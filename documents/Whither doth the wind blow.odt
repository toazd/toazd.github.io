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A2000003645C794FF4.png" manifest:media-type="image/png"/>
  <manifest:file-entry manifest:full-path="Pictures/10000001000005BE000003FE6E7774F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7.9in" style:rel-column-width="65535*"/>
    </style:style>
    <style:style style:name="Table4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Gabriela" officeooo:rsid="001bebfa" officeooo:paragraph-rsid="001bebfa"/>
    </style:style>
    <style:style style:name="P2" style:family="paragraph" style:parent-style-name="Standard">
      <style:text-properties officeooo:rsid="001d22e2" officeooo:paragraph-rsid="001d22e2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Caption">
      <style:text-properties fo:font-size="8pt" style:font-size-asian="8pt" style:font-size-complex="8pt"/>
    </style:style>
    <style:style style:name="P5" style:family="paragraph" style:parent-style-name="Standard">
      <style:text-properties officeooo:rsid="0021fe3b" officeooo:paragraph-rsid="0021fe3b"/>
    </style:style>
    <style:style style:name="P6" style:family="paragraph" style:parent-style-name="Standard">
      <style:text-properties officeooo:rsid="00228605" officeooo:paragraph-rsid="00228605"/>
    </style:style>
    <style:style style:name="P7" style:family="paragraph" style:parent-style-name="Standard">
      <style:text-properties officeooo:rsid="00228605" officeooo:paragraph-rsid="0023e4bf"/>
    </style:style>
    <style:style style:name="P8" style:family="paragraph" style:parent-style-name="Standard" style:list-style-name="L1">
      <style:text-properties officeooo:rsid="0025102a" officeooo:paragraph-rsid="0025102a"/>
    </style:style>
    <style:style style:name="T1" style:family="text">
      <style:text-properties fo:color="#127622" loext:opacity="100%"/>
    </style:style>
    <style:style style:name="T2" style:family="text">
      <style:text-properties fo:background-color="#fff5ce" loext:char-shading-value="0"/>
    </style:style>
    <style:style style:name="T3" style:family="text">
      <style:text-properties officeooo:rsid="0026f067"/>
    </style:style>
    <style:style style:name="T4" style:family="text">
      <style:text-properties officeooo:rsid="0028e52a"/>
    </style:style>
    <style:style style:name="T5" style:family="text">
      <style:text-properties style:text-position="super 58%" officeooo:rsid="0028e52a"/>
    </style:style>
    <style:style style:name="T6" style:family="text">
      <style:text-properties officeooo:rsid="0029bffb"/>
    </style:style>
    <style:style style:name="T7" style:family="text">
      <style:text-properties officeooo:rsid="00201554"/>
    </style:style>
    <style:style style:name="T8" style:family="text">
      <style:text-properties officeooo:rsid="001e73b1"/>
    </style:style>
    <style:style style:name="T9" style:family="text">
      <style:text-properties officeooo:rsid="00221bb1"/>
    </style:style>
    <style:style style:name="T10" style:family="text">
      <style:text-properties officeooo:rsid="0023e4bf"/>
    </style:style>
    <style:style style:name="T11" style:family="text">
      <style:text-properties officeooo:rsid="002a35aa"/>
    </style:style>
    <style:style style:name="T12" style:family="text">
      <style:text-properties officeooo:rsid="002b8ff1"/>
    </style:style>
    <style:style style:name="T13" style:family="text">
      <style:text-properties fo:color="#127622" loext:opacity="100%" officeooo:rsid="002b8ff1"/>
    </style:style>
    <style:style style:name="T14" style:family="text">
      <style:text-properties officeooo:rsid="002d4689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saith the Lord concerning the direction of the winds?</text:p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1">Exodus 10:13</text:span><text:line-break/>And Moses stretched forth his rod over the land of Egypt, and the LORD brought an <text:span text:style-name="T2">east wind</text:span> upon the land all that day, and all that night; and when it was morning, the east wind brought the locusts.</text:p>
          </table:table-cell>
        </table:table-row>
        <table:table-row>
          <table:table-cell table:style-name="Table1.A2" office:value-type="string">
            <text:p text:style-name="Table_20_Contents"><text:span text:style-name="T1">Exodus 10:19</text:span><text:line-break/>And the LORD turned a mighty strong <text:span text:style-name="T2">west wind</text:span>, which took away the locusts, and cast them into the Red sea; there remained not one locust in all the coasts of Egypt.</text:p>
          </table:table-cell>
        </table:table-row>
      </table:table>
      <text:p text:style-name="Standard"/>
      <text:p text:style-name="Standard"/>
      <text:p text:style-name="P2">No matter how you look at it the Red <text:span text:style-name="T3">S</text:span>ea is East of Egypt. And since it was a “west wind” that blew the locusts <text:span text:style-name="T4">from the 8</text:span><text:span text:style-name="T5">th</text:span><text:span text:style-name="T4"> plague </text:span><text:span text:style-name="T6">from Egypt</text:span> into the Red Sea we know <text:span text:style-name="T6">also </text:span>that when the <text:span text:style-name="T7">Bible says</text:span> “<text:span text:style-name="T7">west</text:span> wind” we can read it much the same as we still use <text:span text:style-name="T8">those phrases</text:span> today as “from the west, to the east”.</text:p>
      <text:p text:style-name="P2"/>
      <text:p text:style-name="P2"/>
      <text:p text:style-name="P3"><draw:frame draw:style-name="fr1" draw:name="Frame1" text:anchor-type="as-char" svg:width="7.0717in" draw:z-index="2"><draw:text-box fo:min-height="4.9161in"><text:p text:style-name="P4"><draw:frame draw:style-name="fr2" draw:name="Image2" text:anchor-type="paragraph" svg:width="7.0717in" style:rel-width="100%" svg:height="4.9161in" style:rel-height="scale" draw:z-index="3"><draw:image xlink:href="Pictures/10000001000005BE000003FE6E7774FE.png" xlink:type="simple" xlink:show="embed" xlink:actuate="onLoad" draw:mime-type="image/png"/></draw:frame>Biblemapper 3.0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<draw:frame draw:style-name="fr1" draw:name="Frame2" text:anchor-type="as-char" svg:width="6.4953in" draw:z-index="0"><draw:text-box fo:min-height="3.198in"><text:p text:style-name="P4"><draw:frame draw:style-name="fr2" draw:name="Image1" text:anchor-type="paragraph" svg:width="6.4953in" style:rel-width="100%" svg:height="3.3193in" style:rel-height="scale" draw:z-index="1"><draw:image xlink:href="Pictures/10000001000006A2000003645C794FF4.png" xlink:type="simple" xlink:show="embed" xlink:actuate="onLoad" draw:mime-type="image/png"/></draw:frame>The Ten Commandments, 1956, 3:08:48</text:p></draw:text-box></draw:frame></text:p>
      <text:p text:style-name="Standard"/>
      <text:p text:style-name="P5">In the 1956 film “The Ten Commandments” directed by Cecil B. Demille, the wind is depicted as coming from Moses’ back which would be a “west wind” <text:span text:style-name="T9">(from the west, heading eastward)</text:span>. But, the Bible says the exact opposite:</text:p>
      <text:p text:style-name="P5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T1">Exodus 14:21</text:span><text:line-break/>And Moses stretched out his hand over the sea; and the LORD caused the sea to go back by a strong <text:span text:style-name="T2">east wind</text:span> all that night, and made the sea dry land, and the waters were divided.</text:p>
          </table:table-cell>
        </table:table-row>
      </table:table>
      <text:p text:style-name="P5"/>
      <text:p text:style-name="P5">As we saw above, an “east wind” in the Bible is very clearly the same as “from the east, headed westward.”</text:p>
      <text:p text:style-name="P5"/>
      <text:p text:style-name="P5"/>
      <text:p text:style-name="P6"><text:span text:style-name="T10">N</text:span>ow let’s apply what we learned to <text:span text:style-name="T10">scripture itself instead of discerning truth from error</text:span>.</text:p>
      <text:p text:style-name="P6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pan text:style-name="T1">Numbers 11:31</text:span><text:line-break/>And there went forth <text:span text:style-name="T2">a wind</text:span> from the LORD, and brought quails from the sea, and let them fall by the camp, as it were a day's journey on this side, and as it were a day's journey on the other side, round about the camp, and as it were two cubits high upon the face of the earth.</text:p>
          </table:table-cell>
        </table:table-row>
      </table:table>
      <text:p text:style-name="P6"/>
      <text:p text:style-name="P7"><text:span text:style-name="T11">No direction is given here; but,</text:span> we know from geography that the sea was to the south of where the children of Israel were encamped. <text:span text:style-name="T10">How would we know that if we didn’t know the geography and</text:span> how can we prove that with scripture <text:span text:style-name="T12">(</text:span><text:span text:style-name="T13">1Thess 5:21</text:span><text:span text:style-name="T12">)</text:span>?</text:p>
      <text:p text:style-name="P6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span text:style-name="T1">Psalms 78:26-72</text:span><text:line-break/>26 He caused an <text:span text:style-name="T2">east wind</text:span> to blow in the heaven: and by his power he brought in the <text:span text:style-name="T2">south wind</text:span>.<text:line-break/>27 He rained flesh also upon them as dust, and feathered fowls like as the sand of the sea:<text:line-break/>28 And he let it fall in the midst of their camp, round about their habitations.<text:line-break/>29 So they did eat, and were well filled: for he gave them their own desire;<text:line-break/>30 They were not estranged from their lust. But while their meat was yet in their mouths,<text:line-break/>31 The wrath of God came upon them, and slew the fattest of them, and smote down the chosen men of Israel.</text:p>
          </table:table-cell>
        </table:table-row>
      </table:table>
      <text:list text:style-name="L1">
        <text:list-item>
          <text:p text:style-name="P8">The “east wind” is the parting of the Red Sea.</text:p>
        </text:list-item>
        <text:list-item>
          <text:p text:style-name="P8">The “south wind” <text:span text:style-name="T14">brought the quails from the south northward to the children of Israel’s encampment</text:span>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4T08:35:51.904747800</meta:creation-date>
    <dc:title>Whither doth the wind blow?</dc:title>
    <meta:editing-duration>PT2H42M33S</meta:editing-duration>
    <meta:editing-cycles>19</meta:editing-cycles>
    <meta:generator>LibreOffice/26.2.4.2$Linux_X86_64 LibreOffice_project/64a984c51f4702dbd3710b13428c673a2f1292e7</meta:generator>
    <dc:date>2026-07-11T12:30:43.720064081</dc:date>
    <meta:document-statistic meta:table-count="4" meta:image-count="2" meta:object-count="0" meta:page-count="2" meta:paragraph-count="17" meta:word-count="520" meta:character-count="2656" meta:non-whitespace-character-count="2153"/>
    <meta:template xlink:type="simple" xlink:actuate="onRequest" xlink:title="default" xlink:href="../../../../AppData/Roaming/LibreOffice/4/user/template/default1.ott" meta:date="2026-01-24T08:35:50.227999200"/>
  </office:meta>
</office:document-meta>
</file>