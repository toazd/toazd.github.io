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7" style:family="table">
      <style:table-properties style:width="1.9243in" table:align="center"/>
    </style:style>
    <style:style style:name="Table17.A" style:family="table-column">
      <style:table-column-properties style:column-width="1.0479in"/>
    </style:style>
    <style:style style:name="Table17.B" style:family="table-column">
      <style:table-column-properties style:column-width="0.8764in"/>
    </style:style>
    <style:style style:name="Table17.A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8" style:family="table">
      <style:table-properties style:width="7.9in" table:align="margins"/>
    </style:style>
    <style:style style:name="Table18.A" style:family="table-column">
      <style:table-column-properties style:column-width="7.9in" style:rel-column-width="65535*"/>
    </style:style>
    <style:style style:name="Table18.A1" style:family="table-cell">
      <style:table-cell-properties fo:padding="0.0382in" fo:border="0.5pt solid #000000"/>
    </style:style>
    <style:style style:name="P1" style:family="paragraph" style:parent-style-name="Text_20_body">
      <style:paragraph-properties fo:text-align="center" style:justify-single-word="false"/>
      <style:text-properties style:font-name="Gabriela" officeooo:rsid="00281399" officeooo:paragraph-rsid="00281399"/>
    </style:style>
    <style:style style:name="P2" style:family="paragraph" style:parent-style-name="Text_20_body">
      <style:text-properties officeooo:rsid="002914a4" officeooo:paragraph-rsid="002914a4"/>
    </style:style>
    <style:style style:name="P3" style:family="paragraph" style:parent-style-name="Text_20_body">
      <style:text-properties officeooo:rsid="003bada2" officeooo:paragraph-rsid="003bada2"/>
    </style:style>
    <style:style style:name="P4" style:family="paragraph" style:parent-style-name="Standard">
      <style:text-properties fo:color="#127622" loext:opacity="100%" officeooo:paragraph-rsid="003bada2"/>
    </style:style>
    <style:style style:name="P5" style:family="paragraph" style:parent-style-name="Standard">
      <style:text-properties officeooo:paragraph-rsid="003bada2"/>
    </style:style>
    <style:style style:name="P6" style:family="paragraph" style:parent-style-name="Standard">
      <style:text-properties fo:color="#127622" loext:opacity="100%" officeooo:paragraph-rsid="003c63fc"/>
    </style:style>
    <style:style style:name="P7" style:family="paragraph" style:parent-style-name="Standard">
      <style:text-properties officeooo:paragraph-rsid="003c63fc"/>
    </style:style>
    <style:style style:name="P8" style:family="paragraph" style:parent-style-name="Standard" style:list-style-name="L1">
      <style:text-properties officeooo:rsid="003fc03f" officeooo:paragraph-rsid="003fc03f"/>
    </style:style>
    <style:style style:name="P9" style:family="paragraph" style:parent-style-name="Standard" style:list-style-name="L1">
      <style:text-properties officeooo:rsid="004058d1" officeooo:paragraph-rsid="004058d1"/>
    </style:style>
    <style:style style:name="P10" style:family="paragraph" style:parent-style-name="Standard" style:list-style-name="L1">
      <style:text-properties officeooo:rsid="00c1cab9" officeooo:paragraph-rsid="00c1cab9"/>
    </style:style>
    <style:style style:name="P11" style:family="paragraph" style:parent-style-name="Standard">
      <style:text-properties officeooo:rsid="003bada2" officeooo:paragraph-rsid="003bada2"/>
    </style:style>
    <style:style style:name="P12" style:family="paragraph" style:parent-style-name="Standard">
      <style:text-properties fo:color="#127622" loext:opacity="100%" officeooo:paragraph-rsid="002fa6f6"/>
    </style:style>
    <style:style style:name="P13" style:family="paragraph" style:parent-style-name="Standard">
      <style:text-properties fo:color="#ff0000" loext:opacity="100%" officeooo:paragraph-rsid="002fa6f6"/>
    </style:style>
    <style:style style:name="P14" style:family="paragraph" style:parent-style-name="Table_20_Contents">
      <style:text-properties officeooo:paragraph-rsid="002fa6f6"/>
    </style:style>
    <style:style style:name="P15" style:family="paragraph" style:parent-style-name="Table_20_Contents">
      <style:text-properties fo:color="#127622" loext:opacity="100%" officeooo:paragraph-rsid="002fa6f6"/>
    </style:style>
    <style:style style:name="P16" style:family="paragraph" style:parent-style-name="Table_20_Contents">
      <style:text-properties fo:color="#ff0000" loext:opacity="100%" officeooo:paragraph-rsid="002fa6f6"/>
    </style:style>
    <style:style style:name="P17" style:family="paragraph" style:parent-style-name="Standard" style:list-style-name="L2">
      <style:text-properties officeooo:rsid="002914a4" officeooo:paragraph-rsid="004d2771"/>
    </style:style>
    <style:style style:name="P18" style:family="paragraph" style:parent-style-name="Standard">
      <style:text-properties officeooo:rsid="002914a4" officeooo:paragraph-rsid="002fa6f6"/>
    </style:style>
    <style:style style:name="P19" style:family="paragraph" style:parent-style-name="Standard">
      <style:text-properties fo:color="#127622" loext:opacity="100%" officeooo:paragraph-rsid="00b65fe0"/>
    </style:style>
    <style:style style:name="P20" style:family="paragraph" style:parent-style-name="Standard">
      <style:text-properties officeooo:paragraph-rsid="0050d370"/>
    </style:style>
    <style:style style:name="P21" style:family="paragraph" style:parent-style-name="Standard" style:list-style-name="L3">
      <style:text-properties officeooo:rsid="002914a4" officeooo:paragraph-rsid="005af6af"/>
    </style:style>
    <style:style style:name="P22" style:family="paragraph" style:parent-style-name="Standard" style:list-style-name="L3">
      <style:text-properties officeooo:rsid="0052faa3" officeooo:paragraph-rsid="0052faa3"/>
    </style:style>
    <style:style style:name="P23" style:family="paragraph" style:parent-style-name="Standard">
      <style:text-properties officeooo:paragraph-rsid="00334d1a"/>
    </style:style>
    <style:style style:name="P24" style:family="paragraph" style:parent-style-name="Standard" style:list-style-name="L4">
      <style:text-properties officeooo:rsid="0034f8c0" officeooo:paragraph-rsid="0034f8c0"/>
    </style:style>
    <style:style style:name="P25" style:family="paragraph" style:parent-style-name="Standard" style:list-style-name="L4">
      <style:text-properties officeooo:rsid="00353726" officeooo:paragraph-rsid="00353726"/>
    </style:style>
    <style:style style:name="P26" style:family="paragraph" style:parent-style-name="Standard">
      <style:text-properties officeooo:rsid="00353726" officeooo:paragraph-rsid="00353726"/>
    </style:style>
    <style:style style:name="P27" style:family="paragraph" style:parent-style-name="Standard">
      <style:text-properties fo:color="#127622" loext:opacity="100%" officeooo:paragraph-rsid="00b94c52"/>
    </style:style>
    <style:style style:name="P28" style:family="paragraph" style:parent-style-name="Standard">
      <style:text-properties officeooo:paragraph-rsid="00b94c52"/>
    </style:style>
    <style:style style:name="P29" style:family="paragraph" style:parent-style-name="Table_20_Contents">
      <style:text-properties officeooo:paragraph-rsid="00b94c52"/>
    </style:style>
    <style:style style:name="P30" style:family="paragraph" style:parent-style-name="Table_20_Contents">
      <style:text-properties fo:color="#127622" loext:opacity="100%" officeooo:paragraph-rsid="00b94c52"/>
    </style:style>
    <style:style style:name="P31" style:family="paragraph" style:parent-style-name="Standard" style:list-style-name="L5">
      <style:text-properties officeooo:rsid="00b94c52" officeooo:paragraph-rsid="00b94c52"/>
    </style:style>
    <style:style style:name="P32" style:family="paragraph" style:parent-style-name="Standard">
      <style:text-properties officeooo:rsid="004ac97d" officeooo:paragraph-rsid="00b94c52"/>
    </style:style>
    <style:style style:name="P33" style:family="paragraph" style:parent-style-name="Standard">
      <style:text-properties officeooo:paragraph-rsid="0043d4db"/>
    </style:style>
    <style:style style:name="P34" style:family="paragraph" style:parent-style-name="Table_20_Contents">
      <style:text-properties fo:color="#127622" loext:opacity="100%"/>
    </style:style>
    <style:style style:name="P35" style:family="paragraph" style:parent-style-name="Standard" style:list-style-name="L6">
      <style:text-properties officeooo:rsid="00d2972f" officeooo:paragraph-rsid="00d55978"/>
    </style:style>
    <style:style style:name="P36" style:family="paragraph" style:parent-style-name="Standard" style:list-style-name="L6">
      <style:text-properties officeooo:paragraph-rsid="00d55978"/>
    </style:style>
    <style:style style:name="P37" style:family="paragraph" style:parent-style-name="Standard">
      <style:text-properties officeooo:paragraph-rsid="002fa6f6"/>
    </style:style>
    <style:style style:name="P38" style:family="paragraph" style:parent-style-name="Standard" style:list-style-name="L7">
      <style:text-properties officeooo:paragraph-rsid="007c4a61"/>
    </style:style>
    <style:style style:name="P39" style:family="paragraph" style:parent-style-name="Standard" style:list-style-name="L8">
      <style:text-properties officeooo:rsid="00dceae2" officeooo:paragraph-rsid="00dceae2"/>
    </style:style>
    <style:style style:name="P40" style:family="paragraph" style:parent-style-name="Standard">
      <style:text-properties officeooo:rsid="003bada2" officeooo:paragraph-rsid="00daa1f3"/>
    </style:style>
    <style:style style:name="P41" style:family="paragraph" style:parent-style-name="Standard">
      <style:text-properties fo:color="#127622" loext:opacity="100%" officeooo:paragraph-rsid="0076e290"/>
    </style:style>
    <style:style style:name="P42" style:family="paragraph" style:parent-style-name="Standard">
      <style:text-properties fo:color="#ff0000" loext:opacity="100%" officeooo:paragraph-rsid="0076e290"/>
    </style:style>
    <style:style style:name="P43" style:family="paragraph" style:parent-style-name="Table_20_Contents">
      <style:text-properties officeooo:paragraph-rsid="0076e290"/>
    </style:style>
    <style:style style:name="P44" style:family="paragraph" style:parent-style-name="Table_20_Contents">
      <style:text-properties fo:color="#127622" loext:opacity="100%" officeooo:paragraph-rsid="0076e290"/>
    </style:style>
    <style:style style:name="P45" style:family="paragraph" style:parent-style-name="Table_20_Contents">
      <style:text-properties fo:color="#ff0000" loext:opacity="100%" officeooo:paragraph-rsid="0076e290"/>
    </style:style>
    <style:style style:name="P46" style:family="paragraph" style:parent-style-name="Standard" style:list-style-name="L9">
      <style:text-properties officeooo:rsid="00ffc930" officeooo:paragraph-rsid="00ffc930"/>
    </style:style>
    <style:style style:name="P47" style:family="paragraph" style:parent-style-name="Standard">
      <style:text-properties officeooo:rsid="00837405" officeooo:paragraph-rsid="00837405"/>
    </style:style>
    <style:style style:name="P48" style:family="paragraph" style:parent-style-name="Standard">
      <style:text-properties officeooo:rsid="002914a4" officeooo:paragraph-rsid="0076e290"/>
    </style:style>
    <style:style style:name="P49" style:family="paragraph" style:parent-style-name="Table_20_Contents">
      <style:text-properties fo:color="#127622" loext:opacity="100%" officeooo:paragraph-rsid="006a87fd"/>
    </style:style>
    <style:style style:name="P50" style:family="paragraph" style:parent-style-name="Table_20_Contents">
      <style:text-properties officeooo:paragraph-rsid="006a87fd"/>
    </style:style>
    <style:style style:name="P51" style:family="paragraph" style:parent-style-name="Standard" style:list-style-name="L10">
      <style:text-properties officeooo:rsid="008419b4" officeooo:paragraph-rsid="008419b4"/>
    </style:style>
    <style:style style:name="P52" style:family="paragraph" style:parent-style-name="Standard" style:list-style-name="L10">
      <style:text-properties officeooo:rsid="008e36b9" officeooo:paragraph-rsid="008f0017"/>
    </style:style>
    <style:style style:name="P53" style:family="paragraph" style:parent-style-name="Standard" style:list-style-name="L11">
      <style:text-properties officeooo:rsid="008dad63" officeooo:paragraph-rsid="008dad63"/>
    </style:style>
    <style:style style:name="P54" style:family="paragraph" style:parent-style-name="Standard" style:list-style-name="L12">
      <style:text-properties officeooo:rsid="0099fd7a" officeooo:paragraph-rsid="0099fd7a"/>
    </style:style>
    <style:style style:name="P55" style:family="paragraph" style:parent-style-name="Table_20_Contents">
      <style:text-properties fo:color="#127622" loext:opacity="100%" officeooo:rsid="009c995b" officeooo:paragraph-rsid="009c995b"/>
    </style:style>
    <style:style style:name="P56" style:family="paragraph" style:parent-style-name="Table_20_Contents">
      <style:text-properties officeooo:rsid="009c995b" officeooo:paragraph-rsid="009c995b"/>
    </style:style>
    <style:style style:name="P57" style:family="paragraph" style:parent-style-name="Standard" style:list-style-name="L13">
      <style:text-properties officeooo:rsid="009c995b" officeooo:paragraph-rsid="009c995b"/>
    </style:style>
    <style:style style:name="P58" style:family="paragraph" style:parent-style-name="Standard" style:list-style-name="L14">
      <style:text-properties officeooo:rsid="009fcaca" officeooo:paragraph-rsid="009fcaca"/>
    </style:style>
    <style:style style:name="P59" style:family="paragraph" style:parent-style-name="Standard">
      <style:text-properties officeooo:rsid="009fcaca" officeooo:paragraph-rsid="009fcaca"/>
    </style:style>
    <style:style style:name="P60" style:family="paragraph" style:parent-style-name="Standard">
      <style:text-properties officeooo:paragraph-rsid="00a0725f"/>
    </style:style>
    <style:style style:name="P61" style:family="paragraph" style:parent-style-name="Standard">
      <style:text-properties officeooo:rsid="00a0725f" officeooo:paragraph-rsid="00a0725f"/>
    </style:style>
    <style:style style:name="P62" style:family="paragraph" style:parent-style-name="Table_20_Contents">
      <style:paragraph-properties fo:text-align="center" style:justify-single-word="false"/>
      <style:text-properties fo:font-weight="bold" officeooo:rsid="00ab37f8" officeooo:paragraph-rsid="00ab37f8" style:font-weight-asian="bold" style:font-weight-complex="bold"/>
    </style:style>
    <style:style style:name="P63" style:family="paragraph" style:parent-style-name="Table_20_Contents">
      <style:paragraph-properties fo:text-align="center" style:justify-single-word="false"/>
      <style:text-properties fo:font-weight="bold" officeooo:rsid="00a1b8e9" officeooo:paragraph-rsid="00a1b8e9" style:font-weight-asian="bold" style:font-weight-complex="bold"/>
    </style:style>
    <style:style style:name="P64" style:family="paragraph" style:parent-style-name="Table_20_Contents">
      <style:paragraph-properties fo:text-align="center" style:justify-single-word="false"/>
      <style:text-properties officeooo:rsid="00a0725f" officeooo:paragraph-rsid="00a0725f"/>
    </style:style>
    <style:style style:name="P65" style:family="paragraph" style:parent-style-name="Table_20_Contents">
      <style:paragraph-properties fo:text-align="center" style:justify-single-word="false"/>
      <style:text-properties officeooo:rsid="00a1b8e9" officeooo:paragraph-rsid="00a1b8e9"/>
    </style:style>
    <style:style style:name="P66" style:family="paragraph" style:parent-style-name="Standard">
      <style:text-properties officeooo:rsid="00ac3d10" officeooo:paragraph-rsid="00ac3d10"/>
    </style:style>
    <style:style style:name="P67" style:family="paragraph" style:parent-style-name="Standard">
      <style:text-properties officeooo:rsid="00b0566f" officeooo:paragraph-rsid="00b0566f"/>
    </style:style>
    <style:style style:name="P68" style:family="paragraph" style:parent-style-name="Standard">
      <style:text-properties fo:color="#127622" loext:opacity="100%" officeooo:paragraph-rsid="00831f3d"/>
    </style:style>
    <style:style style:name="P69" style:family="paragraph" style:parent-style-name="Standard">
      <style:text-properties officeooo:paragraph-rsid="00831f3d"/>
    </style:style>
    <style:style style:name="P70" style:family="paragraph" style:parent-style-name="Standard" style:list-style-name="L15">
      <style:text-properties officeooo:rsid="008dad63" officeooo:paragraph-rsid="008dad63"/>
    </style:style>
    <style:style style:name="P71" style:family="paragraph" style:parent-style-name="Standard" style:list-style-name="L15">
      <style:text-properties officeooo:paragraph-rsid="009466b9"/>
    </style:style>
    <style:style style:name="P72" style:family="paragraph" style:parent-style-name="Standard">
      <style:text-properties officeooo:rsid="009660c5" officeooo:paragraph-rsid="009660c5"/>
    </style:style>
    <style:style style:name="P73" style:family="paragraph" style:parent-style-name="Standard">
      <style:text-properties officeooo:rsid="0092eec1" officeooo:paragraph-rsid="0092eec1"/>
    </style:style>
    <style:style style:name="P74" style:family="paragraph" style:parent-style-name="Standard">
      <style:text-properties officeooo:rsid="00b262b2" officeooo:paragraph-rsid="00b262b2"/>
    </style:style>
    <style:style style:name="P75" style:family="paragraph" style:parent-style-name="Standard">
      <style:text-properties fo:color="#ff0000" loext:opacity="100%" officeooo:paragraph-rsid="00b262b2"/>
    </style:style>
    <style:style style:name="T1" style:family="text">
      <style:text-properties officeooo:rsid="00f75291"/>
    </style:style>
    <style:style style:name="T2" style:family="text">
      <style:text-properties officeooo:rsid="00bce7f5"/>
    </style:style>
    <style:style style:name="T3" style:family="text">
      <style:text-properties officeooo:rsid="00bd79ee"/>
    </style:style>
    <style:style style:name="T4" style:family="text">
      <style:text-properties officeooo:rsid="00fa825d"/>
    </style:style>
    <style:style style:name="T5" style:family="text">
      <style:text-properties officeooo:rsid="00bb513b"/>
    </style:style>
    <style:style style:name="T6" style:family="text">
      <style:text-properties officeooo:rsid="0039c84d"/>
    </style:style>
    <style:style style:name="T7" style:family="text">
      <style:text-properties officeooo:rsid="00bfbbf2"/>
    </style:style>
    <style:style style:name="T8" style:family="text">
      <style:text-properties officeooo:rsid="00fb81af"/>
    </style:style>
    <style:style style:name="T9" style:family="text">
      <style:text-properties fo:background-color="transparent" loext:char-shading-value="0"/>
    </style:style>
    <style:style style:name="T10" style:family="text">
      <style:text-properties fo:background-color="#ffff00" loext:char-shading-value="0"/>
    </style:style>
    <style:style style:name="T11" style:family="text">
      <style:text-properties fo:background-color="#fff5ce" loext:char-shading-value="0"/>
    </style:style>
    <style:style style:name="T12" style:family="text">
      <style:text-properties officeooo:rsid="004058d1"/>
    </style:style>
    <style:style style:name="T13" style:family="text">
      <style:text-properties officeooo:rsid="00c482c4"/>
    </style:style>
    <style:style style:name="T14" style:family="text">
      <style:text-properties fo:color="#127622" loext:opacity="100%"/>
    </style:style>
    <style:style style:name="T15" style:family="text">
      <style:text-properties officeooo:rsid="00c515bc"/>
    </style:style>
    <style:style style:name="T16" style:family="text">
      <style:text-properties officeooo:rsid="00c6b02c"/>
    </style:style>
    <style:style style:name="T17" style:family="text">
      <style:text-properties fo:font-style="italic" officeooo:rsid="002fa6f6" style:font-style-asian="italic" style:font-style-complex="italic"/>
    </style:style>
    <style:style style:name="T18" style:family="text">
      <style:text-properties fo:font-style="italic" officeooo:rsid="0054df41" style:font-style-asian="italic" style:font-style-complex="italic"/>
    </style:style>
    <style:style style:name="T19" style:family="text">
      <style:text-properties officeooo:rsid="002fa6f6"/>
    </style:style>
    <style:style style:name="T20" style:family="text">
      <style:text-properties officeooo:rsid="00c90b95"/>
    </style:style>
    <style:style style:name="T21" style:family="text">
      <style:text-properties officeooo:rsid="0041d97f"/>
    </style:style>
    <style:style style:name="T22" style:family="text">
      <style:text-properties fo:font-style="italic" officeooo:rsid="004d2771" style:font-style-asian="italic" style:font-style-complex="italic"/>
    </style:style>
    <style:style style:name="T23" style:family="text">
      <style:text-properties officeooo:rsid="004d2771"/>
    </style:style>
    <style:style style:name="T24" style:family="text">
      <style:text-properties officeooo:rsid="004ec9ae"/>
    </style:style>
    <style:style style:name="T25" style:family="text">
      <style:text-properties officeooo:rsid="005660dd"/>
    </style:style>
    <style:style style:name="T26" style:family="text">
      <style:text-properties fo:color="#127622" loext:opacity="100%" officeooo:rsid="005660dd"/>
    </style:style>
    <style:style style:name="T27" style:family="text">
      <style:text-properties officeooo:rsid="004fe0b1"/>
    </style:style>
    <style:style style:name="T28" style:family="text">
      <style:text-properties officeooo:rsid="00c9e6dd"/>
    </style:style>
    <style:style style:name="T29" style:family="text">
      <style:text-properties officeooo:rsid="004257ee"/>
    </style:style>
    <style:style style:name="T30" style:family="text">
      <style:text-properties fo:font-style="italic" officeooo:rsid="0050d370" style:font-style-asian="italic" style:font-style-complex="italic"/>
    </style:style>
    <style:style style:name="T31" style:family="text">
      <style:text-properties officeooo:rsid="0050d370"/>
    </style:style>
    <style:style style:name="T32" style:family="text">
      <style:text-properties officeooo:rsid="005204d0"/>
    </style:style>
    <style:style style:name="T33" style:family="text">
      <style:text-properties fo:color="#127622" loext:opacity="100%" officeooo:rsid="005204d0"/>
    </style:style>
    <style:style style:name="T34" style:family="text">
      <style:text-properties fo:font-style="italic" officeooo:rsid="005204d0" style:font-style-asian="italic" style:font-style-complex="italic"/>
    </style:style>
    <style:style style:name="T35" style:family="text">
      <style:text-properties fo:font-style="italic" style:font-style-asian="italic" style:font-style-complex="italic"/>
    </style:style>
    <style:style style:name="T36" style:family="text">
      <style:text-properties style:text-position="super 58%"/>
    </style:style>
    <style:style style:name="T37" style:family="text">
      <style:text-properties fo:background-color="#dee6ef" loext:char-shading-value="0"/>
    </style:style>
    <style:style style:name="T38" style:family="text">
      <style:text-properties fo:font-weight="bold" style:font-weight-asian="bold" style:font-weight-complex="bold"/>
    </style:style>
    <style:style style:name="T39" style:family="text">
      <style:text-properties officeooo:rsid="004948f2"/>
    </style:style>
    <style:style style:name="T40" style:family="text">
      <style:text-properties fo:background-color="#dee7e5" loext:char-shading-value="0"/>
    </style:style>
    <style:style style:name="T41" style:family="text">
      <style:text-properties officeooo:rsid="006274e5"/>
    </style:style>
    <style:style style:name="T42" style:family="text">
      <style:text-properties officeooo:rsid="0049d61a"/>
    </style:style>
    <style:style style:name="T43" style:family="text">
      <style:text-properties fo:font-style="italic" officeooo:rsid="0049d61a" style:font-style-asian="italic" style:font-style-complex="italic"/>
    </style:style>
    <style:style style:name="T44" style:family="text">
      <style:text-properties officeooo:rsid="00b94c52"/>
    </style:style>
    <style:style style:name="T45" style:family="text">
      <style:text-properties fo:font-weight="bold" officeooo:rsid="0049d61a" style:font-weight-asian="bold" style:font-weight-complex="bold"/>
    </style:style>
    <style:style style:name="T46" style:family="text">
      <style:text-properties fo:font-style="italic" fo:font-weight="bold" officeooo:rsid="0049d61a" style:font-style-asian="italic" style:font-weight-asian="bold" style:font-style-complex="italic" style:font-weight-complex="bold"/>
    </style:style>
    <style:style style:name="T47" style:family="text">
      <style:text-properties officeooo:rsid="00860c2b"/>
    </style:style>
    <style:style style:name="T48" style:family="text">
      <style:text-properties fo:color="#ff0000" loext:opacity="100%" fo:font-style="italic" style:font-style-asian="italic" style:font-style-complex="italic"/>
    </style:style>
    <style:style style:name="T49" style:family="text">
      <style:text-properties officeooo:rsid="00d67675"/>
    </style:style>
    <style:style style:name="T50" style:family="text">
      <style:text-properties officeooo:rsid="00fd7242"/>
    </style:style>
    <style:style style:name="T51" style:family="text">
      <style:text-properties officeooo:rsid="00d4173a"/>
    </style:style>
    <style:style style:name="T52" style:family="text">
      <style:text-properties fo:color="#127622" loext:opacity="100%" officeooo:rsid="00d4173a"/>
    </style:style>
    <style:style style:name="T53" style:family="text">
      <style:text-properties officeooo:rsid="0074ac16"/>
    </style:style>
    <style:style style:name="T54" style:family="text">
      <style:text-properties officeooo:rsid="00daa1f3"/>
    </style:style>
    <style:style style:name="T55" style:family="text">
      <style:text-properties officeooo:rsid="00737fa0"/>
    </style:style>
    <style:style style:name="T56" style:family="text">
      <style:text-properties officeooo:rsid="00751f1e"/>
    </style:style>
    <style:style style:name="T57" style:family="text">
      <style:text-properties officeooo:rsid="007c4a61"/>
    </style:style>
    <style:style style:name="T58" style:family="text">
      <style:text-properties fo:color="#127622" loext:opacity="100%" officeooo:rsid="005938c8"/>
    </style:style>
    <style:style style:name="T59" style:family="text">
      <style:text-properties officeooo:rsid="00fe9a98"/>
    </style:style>
    <style:style style:name="T60" style:family="text">
      <style:text-properties fo:font-style="italic" officeooo:rsid="00737fa0" style:font-style-asian="italic" style:font-style-complex="italic"/>
    </style:style>
    <style:style style:name="T61" style:family="text">
      <style:text-properties officeooo:rsid="007da27c"/>
    </style:style>
    <style:style style:name="T62" style:family="text">
      <style:text-properties officeooo:rsid="0100b277"/>
    </style:style>
    <style:style style:name="T63" style:family="text">
      <style:text-properties officeooo:rsid="010280b3"/>
    </style:style>
    <style:style style:name="T64" style:family="text">
      <style:text-properties fo:font-weight="bold" officeooo:rsid="010280b3" style:font-weight-asian="bold" style:font-weight-complex="bold"/>
    </style:style>
    <style:style style:name="T65" style:family="text">
      <style:text-properties fo:color="#127622" loext:opacity="100%" officeooo:rsid="00898136"/>
    </style:style>
    <style:style style:name="T66" style:family="text">
      <style:text-properties officeooo:rsid="0083a0b9"/>
    </style:style>
    <style:style style:name="T67" style:family="text">
      <style:text-properties officeooo:rsid="008f0017"/>
    </style:style>
    <style:style style:name="T68" style:family="text">
      <style:text-properties officeooo:rsid="008fb638"/>
    </style:style>
    <style:style style:name="T69" style:family="text">
      <style:text-properties fo:font-weight="bold" officeooo:rsid="008f203e" style:font-weight-asian="bold" style:font-weight-complex="bold"/>
    </style:style>
    <style:style style:name="T70" style:family="text">
      <style:text-properties officeooo:rsid="008f203e"/>
    </style:style>
    <style:style style:name="T71" style:family="text">
      <style:text-properties officeooo:rsid="008bacf9"/>
    </style:style>
    <style:style style:name="T72" style:family="text">
      <style:text-properties fo:font-style="italic" officeooo:rsid="008bacf9" style:font-style-asian="italic" style:font-style-complex="italic"/>
    </style:style>
    <style:style style:name="T73" style:family="text">
      <style:text-properties fo:font-style="normal" officeooo:rsid="008bacf9" style:font-style-asian="normal" style:font-style-complex="normal"/>
    </style:style>
    <style:style style:name="T74" style:family="text">
      <style:text-properties fo:font-style="italic" fo:font-weight="bold" officeooo:rsid="008bacf9" style:font-style-asian="italic" style:font-weight-asian="bold" style:font-style-complex="italic" style:font-weight-complex="bold"/>
    </style:style>
    <style:style style:name="T75" style:family="text">
      <style:text-properties fo:font-style="normal" officeooo:rsid="008ca1ea" style:font-style-asian="normal" style:font-style-complex="normal"/>
    </style:style>
    <style:style style:name="T76" style:family="text">
      <style:text-properties fo:font-style="normal" officeooo:rsid="0096628d" style:font-style-asian="normal" style:font-style-complex="normal"/>
    </style:style>
    <style:style style:name="T77" style:family="text">
      <style:text-properties fo:color="#127622" loext:opacity="100%" fo:font-style="normal" officeooo:rsid="0096628d" style:font-style-asian="normal" style:font-style-complex="normal"/>
    </style:style>
    <style:style style:name="T78" style:family="text">
      <style:text-properties officeooo:rsid="0096628d"/>
    </style:style>
    <style:style style:name="T79" style:family="text">
      <style:text-properties fo:color="#127622" loext:opacity="100%" officeooo:rsid="0096628d"/>
    </style:style>
    <style:style style:name="T80" style:family="text">
      <style:text-properties officeooo:rsid="00e7043b"/>
    </style:style>
    <style:style style:name="T81" style:family="text">
      <style:text-properties officeooo:rsid="00e8a7d3"/>
    </style:style>
    <style:style style:name="T82" style:family="text">
      <style:text-properties officeooo:rsid="00e9961b"/>
    </style:style>
    <style:style style:name="T83" style:family="text">
      <style:text-properties officeooo:rsid="00ee1d4a"/>
    </style:style>
    <style:style style:name="T84" style:family="text">
      <style:text-properties officeooo:rsid="00a0011b"/>
    </style:style>
    <style:style style:name="T85" style:family="text">
      <style:text-properties officeooo:rsid="00a374fb"/>
    </style:style>
    <style:style style:name="T86" style:family="text">
      <style:text-properties officeooo:rsid="00a5e5aa"/>
    </style:style>
    <style:style style:name="T87" style:family="text">
      <style:text-properties officeooo:rsid="00a670b8"/>
    </style:style>
    <style:style style:name="T88" style:family="text">
      <style:text-properties officeooo:rsid="00af07e8"/>
    </style:style>
    <style:style style:name="T89" style:family="text">
      <style:text-properties officeooo:rsid="00a9ce3c"/>
    </style:style>
    <style:style style:name="T90" style:family="text">
      <style:text-properties fo:color="#127622" loext:opacity="100%" officeooo:rsid="00a0725f"/>
    </style:style>
    <style:style style:name="T91" style:family="text">
      <style:text-properties officeooo:rsid="00a0725f"/>
    </style:style>
    <style:style style:name="T92" style:family="text">
      <style:text-properties officeooo:rsid="00ae23bf"/>
    </style:style>
    <style:style style:name="T93" style:family="text">
      <style:text-properties officeooo:rsid="00f10591"/>
    </style:style>
    <style:style style:name="T94" style:family="text">
      <style:text-properties fo:color="#127622" loext:opacity="100%" officeooo:rsid="00f10591"/>
    </style:style>
    <style:style style:name="T95" style:family="text">
      <style:text-properties fo:background-color="#ffffd7" loext:char-shading-value="0"/>
    </style:style>
    <style:style style:name="T96" style:family="text">
      <style:text-properties officeooo:rsid="00b0b73c"/>
    </style:style>
    <style:style style:name="T97" style:family="text">
      <style:text-properties fo:color="#ff0000" loext:opacity="100%" officeooo:rsid="009660c5"/>
    </style:style>
    <style:style style:name="T98" style:family="text">
      <style:text-properties fo:color="#ff0000" loext:opacity="100%" officeooo:rsid="009466b9"/>
    </style:style>
    <style:style style:name="T99" style:family="text">
      <style:text-properties officeooo:rsid="009466b9"/>
    </style:style>
    <style:style style:name="T100" style:family="text">
      <style:text-properties fo:color="#127622" loext:opacity="100%" officeooo:rsid="009466b9"/>
    </style:style>
    <style:style style:name="T101" style:family="text">
      <style:text-properties officeooo:rsid="00b1ba04"/>
    </style:style>
    <style:style style:name="T102" style:family="text">
      <style:text-properties officeooo:rsid="00b2e5ac"/>
    </style:style>
    <style:style style:name="T103" style:family="text">
      <style:text-properties fo:font-style="italic" officeooo:rsid="00b2e5ac" style:font-style-asian="italic" style:font-style-complex="italic"/>
    </style:style>
    <style:style style:name="T104" style:family="text">
      <style:text-properties officeooo:rsid="00f5f517"/>
    </style:style>
    <style:style style:name="T105" style:family="text">
      <style:text-properties officeooo:rsid="00f641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long is “for ever”?</text:p>
      <text:p text:style-name="Text_20_body"/>
      <text:p text:style-name="P2"><text:span text:style-name="T1">It s</text:span><text:span text:style-name="T2">eems like a silly question </text:span><text:span text:style-name="T3">to ask </text:span><text:span text:style-name="T4">at first </text:span><text:span text:style-name="T2">but I assure you it is not. </text:span>At first glance, <text:span text:style-name="T5">we might think that</text:span> the phrase “for ever” is the same as “eternity”; <text:span text:style-name="T6">but, </text:span><text:span text:style-name="T7">that’s not what the Bible </text:span><text:span text:style-name="T8">teaches us</text:span><text:span text:style-name="T7">.</text:span></text:p>
      <text:p text:style-name="P3"/>
      <table:table table:name="Table1" table:style-name="Table1">
        <table:table-column table:style-name="Table1.A"/>
        <table:table-row>
          <table:table-cell table:style-name="Table1.A1" office:value-type="string">
            <text:p text:style-name="P4">Psalms 104:5</text:p>
            <text:p text:style-name="P5">Who laid <text:span text:style-name="T9">the foundations of </text:span><text:span text:style-name="T10">the earth</text:span>, that <text:span text:style-name="T10">it</text:span> should not be removed <text:span text:style-name="T11">for ever</text:span>.</text:p>
            <text:p text:style-name="P5"/>
            <text:p text:style-name="P6">Ecclesiastes 1:4</text:p>
            <text:p text:style-name="P7">One generation passeth away, and another generation cometh: but <text:span text:style-name="T10">the earth</text:span> abideth <text:span text:style-name="T11">for ever</text:span>.</text:p>
          </table:table-cell>
        </table:table-row>
      </table:table>
      <text:list text:style-name="L1">
        <text:list-item>
          <text:p text:style-name="P8">“<text:span text:style-name="T12">it” refers back to “the earth”.</text:span></text:p>
        </text:list-item>
        <text:list-item>
          <text:p text:style-name="P9">The earth abides “for ever”.</text:p>
        </text:list-item>
        <text:list-item>
          <text:p text:style-name="P10">But, what about the new heaven and <text:span text:style-name="T13">the </text:span>new earth in <text:span text:style-name="T14">Revelation 21:1</text:span>? <text:span text:style-name="T15">If “for ever” was the same as eternity that would create a </text:span><text:span text:style-name="T16">contradiction</text:span><text:span text:style-name="T15"> with these verses.</text:span></text:p>
        </text:list-item>
      </text:list>
      <text:p text:style-name="P11"/>
      <table:table table:name="Table3" table:style-name="Table3">
        <table:table-column table:style-name="Table3.A"/>
        <table:table-row>
          <table:table-cell table:style-name="Table3.A1" office:value-type="string">
            <text:p text:style-name="P12">Matthew 24:35</text:p>
            <text:p text:style-name="P13">Heaven and earth <text:span text:style-name="T10">shall pass away</text:span>, but my words shall not pass away.</text:p>
            <text:p text:style-name="P14"/>
            <text:p text:style-name="P15">Mark 13:31</text:p>
            <text:p text:style-name="P16">Heaven and earth <text:span text:style-name="T10">shall pass away</text:span>: but my words shall not pass away.</text:p>
          </table:table-cell>
        </table:table-row>
      </table:table>
      <text:list text:style-name="L2">
        <text:list-item>
          <text:p text:style-name="P17">“<text:span text:style-name="T17">Shall </text:span><text:span text:style-name="T18">pass away</text:span><text:span text:style-name="T19">” is </text:span><text:span text:style-name="T20">a </text:span><text:span text:style-name="T19">future tense </text:span><text:span text:style-name="T21">event.</text:span></text:p>
        </text:list-item>
        <text:list-item>
          <text:p text:style-name="P17"><text:span text:style-name="T21">“</text:span><text:span text:style-name="T22">pass away</text:span><text:span text:style-name="T23">” is </text:span><text:span text:style-name="T24">both literal and </text:span><text:span text:style-name="T23">figurative and it means exactly what we think it does </text:span><text:span text:style-name="T25">(</text:span><text:span text:style-name="T26">Job 34:20</text:span><text:span text:style-name="T25">).</text:span></text:p>
        </text:list-item>
        <text:list-item>
          <text:p text:style-name="P17"><text:span text:style-name="T27">So, w</text:span><text:span text:style-name="T21">hat will happen to the </text:span><text:span text:style-name="T28">current </text:span><text:span text:style-name="T21">earth </text:span><text:span text:style-name="T29">in the future</text:span><text:span text:style-name="T21">?</text:span></text:p>
        </text:list-item>
      </text:list>
      <text:p text:style-name="P18"/>
      <table:table table:name="Table6" table:style-name="Table6">
        <table:table-column table:style-name="Table6.A"/>
        <table:table-row>
          <table:table-cell table:style-name="Table6.A1" office:value-type="string">
            <text:p text:style-name="P19">Isaiah 51:6</text:p>
            <text:p text:style-name="P20">Lift up your eyes to the heavens, and look upon the earth beneath: for <text:span text:style-name="T10">the heavens shall vanish away</text:span> like smoke, and <text:span text:style-name="T10">the earth shall wax old like a garment</text:span>, and they that dwell therein <text:span text:style-name="T10">shall die</text:span> <text:span text:style-name="T11">in like manner</text:span>: but my salvation shall be for ever, and my righteousness shall not be abolished.</text:p>
          </table:table-cell>
        </table:table-row>
      </table:table>
      <text:list text:style-name="L3">
        <text:list-item>
          <text:p text:style-name="P21">“<text:span text:style-name="T30">wax old like a garment</text:span><text:span text:style-name="T31">” is a figurative phrase.</text:span></text:p>
          <text:list>
            <text:list-item>
              <text:p text:style-name="P21"><text:span text:style-name="T32">The parallelism in </text:span><text:span text:style-name="T33">Psalm 102:26</text:span><text:span text:style-name="T32"> teaches us that that phrase means “</text:span><text:span text:style-name="T34">perish</text:span><text:span text:style-name="T32">”.</text:span></text:p>
            </text:list-item>
          </text:list>
        </text:list-item>
        <text:list-item>
          <text:p text:style-name="P22">The phrase “<text:span text:style-name="T35">in like manner</text:span>” points back to both “<text:span text:style-name="T35">vanish away</text:span>” and “<text:span text:style-name="T35">wax old like a garment</text:span>” and teaches us that those phrases mean “to die/<text:span text:style-name="T35">death</text:span>”.</text:p>
        </text:list-item>
      </text:list>
      <text:p text:style-name="P18"/>
      <table:table table:name="Table5" table:style-name="Table5">
        <table:table-column table:style-name="Table5.A"/>
        <table:table-row>
          <table:table-cell table:style-name="Table5.A1" office:value-type="string">
            <text:p text:style-name="P19">2 Peter 3:9-12</text:p>
            <text:p text:style-name="P23"><text:span text:style-name="T36">9 </text:span>The Lord is not slack concerning his promise, as some men count slackness; but is longsuffering to us-ward, not willing that any should perish, but that all should come to repentance.</text:p>
            <text:p text:style-name="P23"><text:span text:style-name="T36">10</text:span> But <text:span text:style-name="T37">the day of the Lord</text:span> will come as a thief in the night; in the which <text:span text:style-name="T10">the heavens shall pass away</text:span> with a great noise, and <text:span text:style-name="T10">the elements shall melt </text:span>with fervent heat, <text:span text:style-name="T10">the earth also</text:span> and <text:span text:style-name="T10">the works</text:span> that are therein <text:span text:style-name="T11">shall be burned up</text:span>.</text:p>
            <text:p text:style-name="P23"><text:span text:style-name="T36">11</text:span> Seeing then that <text:span text:style-name="T10">all these things </text:span><text:span text:style-name="T11">shall be dissolved</text:span>, what manner of persons ought ye to be in all holy conversation and godliness,</text:p>
            <text:p text:style-name="P23"><text:span text:style-name="T36">12</text:span> Looking for and hasting unto the coming of the day of God, wherein the heavens being on fire shall be dissolved, and the elements shall melt with fervent heat?</text:p>
          </table:table-cell>
        </table:table-row>
      </table:table>
      <text:list text:style-name="L4">
        <text:list-item>
          <text:p text:style-name="P24">What does “all these things” refer to?</text:p>
          <text:list>
            <text:list-item>
              <text:p text:style-name="P24">The heaven<text:span text:style-name="T38">s</text:span> (plural<text:span text:style-name="T39">)</text:span>.</text:p>
            </text:list-item>
            <text:list-item>
              <text:p text:style-name="P25">The elements.</text:p>
            </text:list-item>
            <text:list-item>
              <text:p text:style-name="P25">The earth.</text:p>
            </text:list-item>
            <text:list-item>
              <text:p text:style-name="P25">The works within the earth.</text:p>
            </text:list-item>
          </text:list>
        </text:list-item>
      </text:list>
      <text:p text:style-name="P26"/>
      <table:table table:name="Table4" table:style-name="Table4">
        <table:table-column table:style-name="Table4.A"/>
        <text:soft-page-break/>
        <table:table-row>
          <table:table-cell table:style-name="Table4.A1" office:value-type="string">
            <text:p text:style-name="P27">Psalms 102:24-27</text:p>
            <text:p text:style-name="P28"><text:span text:style-name="T36">24</text:span> I said, O my God, take me not away in the midst of my days: thy years are throughout all generations.</text:p>
            <text:p text:style-name="P28"><text:span text:style-name="T36">25</text:span> Of old hast thou laid <text:span text:style-name="T10">the foundation of the earth</text:span>: and <text:span text:style-name="T10">the heavens</text:span> are the work of thy hands.</text:p>
            <text:p text:style-name="P28"><text:span text:style-name="T36">26</text:span> <text:span text:style-name="T11">They shall perish</text:span>, but thou shalt endure: yea, all of them shall <text:span text:style-name="T11">wax old like a garment</text:span>; as a vesture shalt thou change them, and they shall be changed:</text:p>
            <text:p text:style-name="P28"><text:span text:style-name="T36">27</text:span> But thou art the same, and thy years shall have <text:span text:style-name="T40">no end</text:span>.</text:p>
            <text:p text:style-name="P29"/>
            <text:p text:style-name="P30">Hebrews 1:10-12</text:p>
            <text:p text:style-name="P29"><text:span text:style-name="T36">10</text:span> And, Thou, Lord, in the beginning hast laid <text:span text:style-name="T10">the foundation of the earth</text:span>; and <text:span text:style-name="T10">the heavens</text:span> are the works of thine hands:</text:p>
            <text:p text:style-name="P29"><text:span text:style-name="T36">11</text:span> <text:span text:style-name="T11">They shall perish</text:span>; but thou remainest; and they all shall wax old as doth a garment;</text:p>
            <text:p text:style-name="P29"><text:span text:style-name="T36">12</text:span> And as a vesture shalt thou fold them up, and they shall be changed: but thou art the same, and thy years shall not fail.</text:p>
          </table:table-cell>
        </table:table-row>
      </table:table>
      <text:list text:style-name="L5">
        <text:list-item>
          <text:p text:style-name="P31">The earth and the heavens will perish.</text:p>
        </text:list-item>
      </text:list>
      <text:p text:style-name="P28"/>
      <text:p text:style-name="P28"><text:span text:style-name="T41">Since</text:span><text:span text:style-name="T42"> “</text:span><text:span text:style-name="T43">all these things</text:span><text:span text:style-name="T42">” shall be burned up/</text:span><text:span text:style-name="T44">perish</text:span><text:span text:style-name="T42"> then “</text:span><text:span text:style-name="T43">for ever</text:span><text:span text:style-name="T42">” is </text:span><text:span text:style-name="T41">now </text:span><text:span text:style-name="T45">necessarily</text:span><text:span text:style-name="T42"> a finite period of </text:span><text:span text:style-name="T46">time</text:span><text:span text:style-name="T42">.</text:span></text:p>
      <text:p text:style-name="P32">This then paves the way for the new heaven and <text:span text:style-name="T47">the </text:span>new earth of <text:span text:style-name="T14">Revelation 21:1</text:span> and beyond (<text:span text:style-name="T14">Revelation 21:5</text:span> “<text:span text:style-name="T48">all</text:span>”).</text:p>
      <text:p text:style-name="P33"/>
      <table:table table:name="Table11" table:style-name="Table11">
        <table:table-column table:style-name="Table11.A"/>
        <table:table-row>
          <table:table-cell table:style-name="Table11.A1" office:value-type="string">
            <text:p text:style-name="P34">Psalms 12:6-7</text:p>
            <text:p text:style-name="Table_20_Contents"><text:span text:style-name="T36">6</text:span> The words of the LORD are pure words: as silver tried in a furnace of earth, purified seven times.</text:p>
            <text:p text:style-name="Table_20_Contents"><text:span text:style-name="T36">7</text:span> Thou shalt keep them, O LORD, thou shalt preserve them from this generation <text:span text:style-name="T10">for ever</text:span>.</text:p>
          </table:table-cell>
        </table:table-row>
      </table:table>
      <text:list text:style-name="L6">
        <text:list-item>
          <text:p text:style-name="P35">The written word (our physical Bible books) will be burned up with everything else <text:span text:style-name="T49">on earth.</text:span></text:p>
        </text:list-item>
        <text:list-item>
          <text:p text:style-name="P36"><text:span text:style-name="T50">And t</text:span><text:span text:style-name="T51">hat’s precisely when God’s promise in </text:span><text:span text:style-name="T52">Psalm 21:7</text:span> ends.</text:p>
        </text:list-item>
      </text:list>
      <text:p text:style-name="P37"/>
      <table:table table:name="Table8" table:style-name="Table8">
        <table:table-column table:style-name="Table8.A"/>
        <table:table-row>
          <table:table-cell table:style-name="Table8.A1" office:value-type="string">
            <text:p text:style-name="P34">Psalms 119:89</text:p>
            <text:p text:style-name="Table_20_Contents">LAMED. <text:span text:style-name="T10">For ever</text:span>, O LORD, thy word is settled in heaven.</text:p>
          </table:table-cell>
        </table:table-row>
      </table:table>
      <text:list text:style-name="L7">
        <text:list-item>
          <text:p text:style-name="P38"><text:span text:style-name="T53">This is </text:span><text:span text:style-name="T54">one of the very few (if not the only) verse that is </text:span><text:span text:style-name="T53">n</text:span><text:span text:style-name="T55">ot talking about the written word </text:span><text:span text:style-name="T56">that we can see </text:span><text:span text:style-name="T57">(</text:span><text:span text:style-name="T58">2 Corinthians 4:18</text:span>). <text:span text:style-name="T54">B</text:span><text:span text:style-name="T59">ut, the use of the</text:span><text:span text:style-name="T55"> phrase “</text:span><text:span text:style-name="T60">for ever</text:span><text:span text:style-name="T55">” </text:span><text:span text:style-name="T59">is </text:span><text:span text:style-name="T61">an important distinction.</text:span></text:p>
        </text:list-item>
      </text:list>
      <text:p text:style-name="P37"/>
      <text:p text:style-name="P37"/>
      <table:table table:name="Table9" table:style-name="Table9">
        <table:table-column table:style-name="Table9.A"/>
        <table:table-row>
          <table:table-cell table:style-name="Table9.A1" office:value-type="string">
            <text:p text:style-name="P34">Isaiah 40:8</text:p>
            <text:p text:style-name="Table_20_Contents">The grass withereth, the flower fadeth: but the word of our God shall stand <text:span text:style-name="T10">for ever</text:span>.</text:p>
          </table:table-cell>
        </table:table-row>
      </table:table>
      <text:p text:style-name="P37"/>
      <text:p text:style-name="P37"/>
      <table:table table:name="Table2" table:style-name="Table2">
        <table:table-column table:style-name="Table2.A"/>
        <table:table-row>
          <table:table-cell table:style-name="Table2.A1" office:value-type="string">
            <text:p text:style-name="P34">1 Peter 1:23</text:p>
            <text:p text:style-name="Table_20_Contents">Being born again, not of corruptible seed, but of incorruptible, by the word of God, which liveth and abideth <text:span text:style-name="T10">for ever</text:span>.</text:p>
            <text:p text:style-name="Table_20_Contents"/>
            <text:p text:style-name="P34">1 Peter 1:25</text:p>
            <text:p text:style-name="Table_20_Contents">But the word of the Lord endureth <text:span text:style-name="T10">for ever</text:span>. And this is the word which by the gospel is preached unto you.</text:p>
          </table:table-cell>
        </table:table-row>
      </table:table>
      <text:list text:style-name="L8">
        <text:list-item>
          <text:p text:style-name="P39">More references to the written word.</text:p>
        </text:list-item>
      </text:list>
      <text:p text:style-name="P40"/>
      <text:p text:style-name="P40"/>
      <table:table table:name="Table10" table:style-name="Table10">
        <table:table-column table:style-name="Table10.A"/>
        <table:table-row>
          <table:table-cell table:style-name="Table10.A1" office:value-type="string">
            <text:p text:style-name="P41">Matthew 24:35</text:p>
            <text:p text:style-name="P42">Heaven and earth <text:span text:style-name="T9">shall pass away</text:span>, but <text:span text:style-name="T10">my words shall not pass away</text:span>.</text:p>
            <text:p text:style-name="P43"/>
            <text:p text:style-name="P44">Mark 13:31</text:p>
            <text:p text:style-name="P45">Heaven and earth <text:span text:style-name="T9">shall pass away</text:span>: but <text:span text:style-name="T10">my words shall not pass away</text:span>.</text:p>
          </table:table-cell>
        </table:table-row>
      </table:table>
      <text:list text:style-name="L9">
        <text:list-item>
          <text:p text:style-name="P46">Is Jesus talking about the written word? The written word will pass away when the earth and all the works therein are <text:span text:style-name="T62">burned up. </text:span><text:span text:style-name="T63">Therefore, Jesus </text:span><text:span text:style-name="T64">is not</text:span><text:span text:style-name="T63"> talking about the written word in these verses!</text:span></text:p>
        </text:list-item>
      </text:list>
      <text:p text:style-name="P47"><text:soft-page-break/>Remember how we read in <text:span text:style-name="T14">1 Peter </text:span><text:span text:style-name="T65">3:9-12</text:span> that the earth and <text:span text:style-name="T38">the works</text:span> therein will be burned up? Does that include our physical Bibles? <text:span text:style-name="T66">Before you answer you might want to read this:</text:span></text:p>
      <text:p text:style-name="P48"/>
      <table:table table:name="Table7" table:style-name="Table7">
        <table:table-column table:style-name="Table7.A"/>
        <table:table-row>
          <table:table-cell table:style-name="Table7.A1" office:value-type="string">
            <text:p text:style-name="P49">2 Corinthians 4:18</text:p>
            <text:p text:style-name="P50">While we look not at the things which are seen, but at the things which are not seen: for <text:span text:style-name="T10">the things which are seen are temporal</text:span>; but the things which are not seen are eternal. </text:p>
          </table:table-cell>
        </table:table-row>
      </table:table>
      <text:list text:style-name="L10">
        <text:list-item>
          <text:p text:style-name="P51">That includes our physical Bibles.</text:p>
        </text:list-item>
        <text:list-item>
          <text:p text:style-name="P52">God’s <text:span text:style-name="T38">written</text:span> word has a prescribed shelf life.</text:p>
          <text:list>
            <text:list-item>
              <text:p text:style-name="P52"><text:span text:style-name="T67">And if we think very carefully it makes perfect sense. At some point in the </text:span><text:span text:style-name="T68">near future </text:span><text:span text:style-name="T67">God’s </text:span><text:span text:style-name="T69">written</text:span><text:span text:style-name="T70"> </text:span><text:span text:style-name="T67">word will no longer </text:span><text:span text:style-name="T68">exist.</text:span></text:p>
            </text:list-item>
          </text:list>
        </text:list-item>
      </text:list>
      <text:p text:style-name="Standard"/>
      <text:p text:style-name="Standard"/>
      <text:p text:style-name="Horizontal_20_Line"/>
      <text:p text:style-name="Standard"/>
      <text:p text:style-name="Standard"><text:span text:style-name="T71">So, now that we’ve firmly established that “</text:span><text:span text:style-name="T72">for ever</text:span><text:span text:style-name="T73">” is a finite period of </text:span><text:span text:style-name="T74">time</text:span><text:span text:style-name="T73"> that begs the question</text:span><text:span text:style-name="T75">s</text:span><text:span text:style-name="T73">: when </text:span><text:span text:style-name="T75">did it begin and when does it</text:span><text:span text:style-name="T73"> end? </text:span><text:span text:style-name="T76">For the answer we go back to </text:span><text:span text:style-name="T77">Psalm 104:5</text:span> <text:span text:style-name="T78">and </text:span><text:span text:style-name="T79">Ecclesiastes 1:4</text:span> <text:span text:style-name="T78">because </text:span><text:span text:style-name="T80">combined with what we’ve learned we can now deduce that the end of “for ever” is the same as the end of the current earth and is very likely the same as the end of time itself.</text:span></text:p>
      <text:p text:style-name="Standard"/>
      <table:table table:name="Table13" table:style-name="Table13">
        <table:table-column table:style-name="Table13.A"/>
        <table:table-row>
          <table:table-cell table:style-name="Table13.A1" office:value-type="string">
            <text:p text:style-name="P34">Genesis 1:1</text:p>
            <text:p text:style-name="Table_20_Contents">In the <text:span text:style-name="T10">beginning</text:span> God created the heaven and the earth.</text:p>
          </table:table-cell>
        </table:table-row>
      </table:table>
      <text:list text:style-name="L11">
        <text:list-item>
          <text:p text:style-name="P53">Time begins <text:span text:style-name="T81">(roughly: </text:span><text:span text:style-name="T82">because of “in”</text:span><text:span text:style-name="T81">).</text:span></text:p>
        </text:list-item>
      </text:list>
      <text:p text:style-name="Standard"/>
      <table:table table:name="Table14" table:style-name="Table14">
        <table:table-column table:style-name="Table14.A"/>
        <table:table-row>
          <table:table-cell table:style-name="Table14.A1" office:value-type="string">
            <text:p text:style-name="P34">Revelation 21:1</text:p>
            <text:p text:style-name="Table_20_Contents">And I saw a new heaven and <text:span text:style-name="T10">a new earth</text:span>: for the first heaven and <text:span text:style-name="T11">the first earth</text:span> were <text:span text:style-name="T11">passed away</text:span>; and there was no more sea.</text:p>
          </table:table-cell>
        </table:table-row>
      </table:table>
      <text:list text:style-name="L12">
        <text:list-item>
          <text:p text:style-name="P54">The end of “<text:span text:style-name="T35">for ever</text:span>” (the current earth) occurs before this.</text:p>
        </text:list-item>
      </text:list>
      <text:p text:style-name="Standard"/>
      <table:table table:name="Table15" table:style-name="Table15">
        <table:table-column table:style-name="Table15.A"/>
        <table:table-row>
          <table:table-cell table:style-name="Table15.A1" office:value-type="string">
            <text:p text:style-name="P55">Revelation 20:6-10</text:p>
            <text:p text:style-name="P56"><text:span text:style-name="T36">6</text:span> Blessed and holy is he that hath part in the first resurrection: on such the second death hath no power, but they shall be priests of God and of Christ, and shall reign with him a thousand years.</text:p>
            <text:p text:style-name="P56"><text:span text:style-name="T36">7</text:span> And when the thousand years are expired, Satan shall be loosed out of his prison,</text:p>
            <text:p text:style-name="P56"><text:span text:style-name="T36">8</text:span> And shall go out to deceive the nations which are in the four quarters of the earth, Gog and Magog, to gather them together to battle: the number of whom is as the sand of the sea.</text:p>
            <text:p text:style-name="P56"><text:span text:style-name="T36">9</text:span> And they went up on the breadth of <text:span text:style-name="T10">the earth</text:span>, and compassed the camp of the saints about, and the beloved city: and fire came down from God out of heaven, and devoured them.</text:p>
            <text:p text:style-name="P56"><text:span text:style-name="T36">10</text:span> And the devil that deceived them was cast into the lake of fire and brimstone, where the beast and the false prophet are, and shall be tormented day and night for ever and ever.</text:p>
          </table:table-cell>
        </table:table-row>
      </table:table>
      <text:list text:style-name="L13">
        <text:list-item>
          <text:p text:style-name="P57">The “last” events recorded on earth before the <text:span text:style-name="T83">old earth passes away and the </text:span>new earth is created.</text:p>
        </text:list-item>
      </text:list>
      <text:p text:style-name="Standard"/>
      <table:table table:name="Table16" table:style-name="Table16">
        <table:table-column table:style-name="Table16.A"/>
        <table:table-row>
          <table:table-cell table:style-name="Table16.A1" office:value-type="string">
            <text:p text:style-name="P34">Revelation 20:11</text:p>
            <text:p text:style-name="Table_20_Contents">And I saw a great white throne, and him that sat on it, from whose face <text:span text:style-name="T11">the earth</text:span> and the heaven <text:span text:style-name="T11">fled away</text:span>; and there was found <text:span text:style-name="T10">no place for them</text:span>.</text:p>
          </table:table-cell>
        </table:table-row>
      </table:table>
      <text:list text:style-name="L14">
        <text:list-item>
          <text:p text:style-name="P58">The end of the current earth and heaven.</text:p>
        </text:list-item>
      </text:list>
      <text:p text:style-name="P59"/>
      <text:p text:style-name="P59"/>
      <text:p text:style-name="P59"/>
      <text:p text:style-name="P59"/>
      <text:p text:style-name="P59"/>
      <text:p text:style-name="P59"/>
      <text:p text:style-name="P59"/>
      <text:p text:style-name="P60"><text:soft-page-break/><text:span text:style-name="T84">If you weren’t already aware, the book of Revelation is “divided” into </text:span><text:span text:style-name="T85">seven</text:span><text:span text:style-name="T84"> “parallel” sections, each beginning with the coming of Christ and ending with the eternal state. </text:span><text:span text:style-name="T86">Colloquially this is referred to as “progressive parallelism” or “recapitulation”. </text:span><text:span text:style-name="T87">So for example, chapter </text:span><text:span text:style-name="T88">1</text:span><text:span text:style-name="T87"> is roughly parallel to chapter </text:span><text:span text:style-name="T88">4</text:span><text:span text:style-name="T87">.</text:span></text:p>
      <text:p text:style-name="P61"/>
      <table:table table:name="Table17" table:style-name="Table17">
        <table:table-column table:style-name="Table17.A"/>
        <table:table-column table:style-name="Table17.B"/>
        <table:table-row>
          <table:table-cell table:style-name="Table17.A1" table:number-columns-spanned="2" office:value-type="string">
            <text:p text:style-name="P62">Revelation</text:p>
          </table:table-cell>
          <table:covered-table-cell/>
        </table:table-row>
        <table:table-row>
          <table:table-cell table:style-name="Table17.A2" office:value-type="string">
            <text:p text:style-name="P63"><text:span text:style-name="T89">S</text:span>ection</text:p>
          </table:table-cell>
          <table:table-cell table:style-name="Table17.B2" office:value-type="string">
            <text:p text:style-name="P63">Chapters</text:p>
          </table:table-cell>
        </table:table-row>
        <table:table-row>
          <table:table-cell table:style-name="Table17.A2" office:value-type="string">
            <text:p text:style-name="P64">1</text:p>
          </table:table-cell>
          <table:table-cell table:style-name="Table17.B2" office:value-type="string">
            <text:p text:style-name="P65">1-3</text:p>
          </table:table-cell>
        </table:table-row>
        <table:table-row>
          <table:table-cell table:style-name="Table17.A2" office:value-type="string">
            <text:p text:style-name="P64">2</text:p>
          </table:table-cell>
          <table:table-cell table:style-name="Table17.B2" office:value-type="string">
            <text:p text:style-name="P65">4-7</text:p>
          </table:table-cell>
        </table:table-row>
        <table:table-row>
          <table:table-cell table:style-name="Table17.A2" office:value-type="string">
            <text:p text:style-name="P64">3</text:p>
          </table:table-cell>
          <table:table-cell table:style-name="Table17.B2" office:value-type="string">
            <text:p text:style-name="P65">8-11</text:p>
          </table:table-cell>
        </table:table-row>
        <table:table-row>
          <table:table-cell table:style-name="Table17.A2" office:value-type="string">
            <text:p text:style-name="P64">4</text:p>
          </table:table-cell>
          <table:table-cell table:style-name="Table17.B2" office:value-type="string">
            <text:p text:style-name="P65">12-14</text:p>
          </table:table-cell>
        </table:table-row>
        <table:table-row>
          <table:table-cell table:style-name="Table17.A2" office:value-type="string">
            <text:p text:style-name="P64">5</text:p>
          </table:table-cell>
          <table:table-cell table:style-name="Table17.B2" office:value-type="string">
            <text:p text:style-name="P65">15-16</text:p>
          </table:table-cell>
        </table:table-row>
        <table:table-row>
          <table:table-cell table:style-name="Table17.A2" office:value-type="string">
            <text:p text:style-name="P64">6</text:p>
          </table:table-cell>
          <table:table-cell table:style-name="Table17.B2" office:value-type="string">
            <text:p text:style-name="P65">17-19</text:p>
          </table:table-cell>
        </table:table-row>
        <table:table-row>
          <table:table-cell table:style-name="Table17.A2" office:value-type="string">
            <text:p text:style-name="P64">7</text:p>
          </table:table-cell>
          <table:table-cell table:style-name="Table17.B2" office:value-type="string">
            <text:p text:style-name="P65">20-22</text:p>
          </table:table-cell>
        </table:table-row>
      </table:table>
      <text:p text:style-name="P61"/>
      <text:p text:style-name="P66">Looking at it this way, we can see that <text:span text:style-name="T14">R</text:span><text:span text:style-name="T90">evelation 10</text:span><text:span text:style-name="T91"> is roughly parallel to </text:span><text:span text:style-name="T14">Revelation 21</text:span>. But, we know that <text:span text:style-name="T14">Revelation 10</text:span> occurs before <text:span text:style-name="T14">Revelation 21</text:span> <text:span text:style-name="T92">chronologically </text:span>because <text:span text:style-name="T93">in </text:span><text:span text:style-name="T94">Revelation 10</text:span><text:span text:style-name="T93"> </text:span>the angel stands on the current earth.</text:p>
      <text:p text:style-name="P66"/>
      <text:p text:style-name="P67">So, why is that important?</text:p>
      <text:p text:style-name="P67"/>
      <table:table table:name="Table12" table:style-name="Table12">
        <table:table-column table:style-name="Table12.A"/>
        <table:table-row>
          <table:table-cell table:style-name="Table12.A1" office:value-type="string">
            <text:p text:style-name="P68">Revelation 10:5-7</text:p>
            <text:p text:style-name="P69"><text:span text:style-name="T36">5</text:span> And the angel which I saw stand upon the sea and upon the earth lifted up his hand to heaven,</text:p>
            <text:p text:style-name="P69"><text:span text:style-name="T36">6</text:span> And sware by him that liveth for ever and ever, who created heaven, and the things that therein are, and the earth, and the things that therein are, and the sea, and the things which are therein, <text:span text:style-name="T10">that there should be time no longer</text:span>:</text:p>
            <text:p text:style-name="P69"><text:span text:style-name="T36">7</text:span> But in the days of the voice of the seventh angel, when he shall begin to sound, the mystery of God should be <text:span text:style-name="T40">finished</text:span>, <text:span text:style-name="T95">as he hath declared to his servants the prophets</text:span>.</text:p>
          </table:table-cell>
        </table:table-row>
      </table:table>
      <text:list text:style-name="L15">
        <text:list-item>
          <text:p text:style-name="P70"><text:span text:style-name="T96">Because it’s the end of time itself</text:span>.</text:p>
        </text:list-item>
        <text:list-item>
          <text:p text:style-name="P71"><text:span text:style-name="T97">T</text:span><text:span text:style-name="T98">ill all be fulfilled</text:span><text:span text:style-name="T99"> (</text:span><text:span text:style-name="T100">Matthew 5:18</text:span><text:span text:style-name="T99">, </text:span><text:span text:style-name="T100">24:34</text:span><text:span text:style-name="T99">, </text:span><text:span text:style-name="T100">Luke 21:32</text:span><text:span text:style-name="T99">).</text:span></text:p>
        </text:list-item>
      </text:list>
      <text:p text:style-name="P72"/>
      <text:p text:style-name="P73">When we combine all that we’ve learned the Bible teaches us that “<text:span text:style-name="T35">for ever</text:span>” is <text:span text:style-name="T101">t</text:span>he same as “<text:span text:style-name="T35">until the end of time</text:span>”.</text:p>
      <text:p text:style-name="P73"/>
      <text:p text:style-name="P74">Interestingly, the words “eternal/eternity” do not appear in the book of the Revelation. But, the concept does. <text:span text:style-name="T102">The phrase “</text:span><text:span text:style-name="T103">for ever and ever</text:span><text:span text:style-name="T102">” appears 46 times in 46 verses in the Bible </text:span><text:span text:style-name="T104">and the meaning of the phras</text:span><text:span text:style-name="T105">e is </text:span><text:span text:style-name="T104">self explanatory:</text:span></text:p>
      <text:p text:style-name="P74"/>
      <table:table table:name="Table18" table:style-name="Table18">
        <table:table-column table:style-name="Table18.A"/>
        <table:table-row>
          <table:table-cell table:style-name="Table18.A1" office:value-type="string">
            <text:p text:style-name="P34">Exodus 15:18</text:p>
            <text:p text:style-name="Table_20_Contents">The LORD shall <text:span text:style-name="T10">reign </text:span><text:span text:style-name="T11">for ever and ever</text:span>.</text:p>
            <text:p text:style-name="Table_20_Contents"/>
            <text:p text:style-name="P34">1 Timothy 1:17</text:p>
            <text:p text:style-name="Table_20_Contents">Now unto <text:span text:style-name="T10">the King </text:span><text:span text:style-name="T11">eternal</text:span>, immortal, invisible, the only wise God, be honour and glory for ever and ever. Amen.</text:p>
          </table:table-cell>
        </table:table-row>
      </table:table>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0:51:31.113182318</meta:creation-date>
    <dc:date>2026-07-11T12:19:49.339773027</dc:date>
    <meta:editing-duration>PT4H42M59S</meta:editing-duration>
    <meta:editing-cycles>234</meta:editing-cycles>
    <meta:generator>LibreOffice/26.2.4.2$Linux_X86_64 LibreOffice_project/64a984c51f4702dbd3710b13428c673a2f1292e7</meta:generator>
    <meta:document-statistic meta:table-count="18" meta:image-count="0" meta:object-count="0" meta:page-count="4" meta:paragraph-count="118" meta:word-count="1725" meta:character-count="9016" meta:non-whitespace-character-count="7437"/>
  </office:meta>
</office:document-meta>
</file>