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svg:stroke-color="#ff8000" draw:marker-start="Arrow" draw:marker-start-width="0.3cm" draw:marker-end="Arrow" draw:marker-end-width="0.3cm" draw:textarea-vertical-align="middle" loext:decorative="false"/>
      <style:paragraph-properties style:writing-mode="lr-tb"/>
    </style:style>
    <style:style style:name="gr5" style:family="graphic" style:parent-style-name="standard">
      <style:graphic-properties svg:stroke-color="#ffbf00" draw:fill="solid" draw:fill-color="#ffdbb6" draw:textarea-horizontal-align="justify" draw:textarea-vertical-align="middle" draw:auto-grow-height="false" fo:min-height="0.199cm" fo:min-width="0cm" fo:wrap-option="wrap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ffdbb6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5.08cm" svg:height="2.54cm" draw:transform="rotate (0.471238898038469) translate (5.463cm 11.181cm)">
            <text:p text:style-name="P1">648in.<text:span text:style-name="T1">2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6.641cm" svg:y1="13.463cm" svg:x2="6.641cm" svg:y2="14.45cm">
            <text:p/>
          </draw:line>
          <draw:line draw:style-name="gr3" draw:text-style-name="P3" draw:layer="layout" svg:x1="5.463cm" svg:y1="11.221cm" svg:x2="5.463cm" svg:y2="12.208cm">
            <text:p/>
          </draw:line>
          <draw:line draw:style-name="gr3" draw:text-style-name="P3" draw:layer="layout" svg:x1="9.945cm" svg:y1="8.941cm" svg:x2="9.945cm" svg:y2="9.928cm">
            <text:p/>
          </draw:line>
          <draw:line draw:style-name="gr3" draw:text-style-name="P3" draw:layer="layout" svg:x1="11.142cm" svg:y1="11.139cm" svg:x2="11.142cm" svg:y2="12.126cm">
            <text:p/>
          </draw:line>
          <draw:line draw:style-name="gr4" draw:text-style-name="P4" draw:layer="layout" svg:x1="5.231cm" svg:y1="10.826cm" svg:x2="9.732cm" svg:y2="8.471cm">
            <text:p text:style-name="P1"><text:span text:style-name="T2">2 cubits</text:span></text:p>
            <text:p text:style-name="P1"><text:span text:style-name="T2">~36in. / 3ft.</text:span></text:p>
          </draw:line>
          <draw:line draw:style-name="gr4" draw:text-style-name="P5" draw:layer="layout" svg:x1="10.38cm" svg:y1="8.676cm" svg:x2="11.526cm" svg:y2="10.874cm">
            <text:p text:style-name="P1"><text:span text:style-name="T3">1 cubit</text:span></text:p>
            <text:p text:style-name="P1"><text:span text:style-name="T3">~18in. / 1.5ft.</text:span></text:p>
          </draw:line>
          <draw:custom-shape draw:style-name="gr5" draw:text-style-name="P6" draw:layer="layout" svg:width="0.635cm" svg:height="0.635cm" svg:x="5.762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6.537cm" svg:y="10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7.28cm" svg:y="10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8.066cm" svg:y="10.0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8.814cm" svg:y="9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9.526cm" svg:y="9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10.148cm" svg:y="10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9.459cm" svg:y="10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8.745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8.079cm" svg:y="11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7.365cm" svg:y="11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635cm" svg:height="0.635cm" svg:x="6.551cm" svg:y="12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17:33:20.766708238</meta:creation-date>
    <dc:date>2026-07-11T12:21:08.617137686</dc:date>
    <meta:editing-duration>PT17M9S</meta:editing-duration>
    <meta:editing-cycles>7</meta:editing-cycles>
    <meta:generator>LibreOffice/26.2.4.2$Linux_X86_64 LibreOffice_project/64a984c51f4702dbd3710b13428c673a2f1292e7</meta:generator>
    <meta:document-statistic meta:object-count="20"/>
  </office:meta>
</office:document-meta>
</file>