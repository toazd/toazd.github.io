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0000003E5D39D3B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9in" table:align="margins"/>
    </style:style>
    <style:style style:name="Table1.A" style:family="table-column">
      <style:table-column-properties style:column-width="7.9in" style:rel-column-width="65535*"/>
    </style:style>
    <style:style style:name="Table1.A1" style:family="table-cell">
      <style:table-cell-properties fo:padding="0.0382in" fo:border="0.5pt solid #000000"/>
    </style:style>
    <style:style style:name="Table6" style:family="table">
      <style:table-properties style:width="7.9in" table:align="margins"/>
    </style:style>
    <style:style style:name="Table6.A" style:family="table-column">
      <style:table-column-properties style:column-width="7.9in" style:rel-column-width="65535*"/>
    </style:style>
    <style:style style:name="Table6.A1" style:family="table-cell">
      <style:table-cell-properties fo:padding="0.0382in" fo:border="0.5pt solid #000000"/>
    </style:style>
    <style:style style:name="Table2" style:family="table">
      <style:table-properties style:width="7.9in" table:align="margins"/>
    </style:style>
    <style:style style:name="Table2.A" style:family="table-column">
      <style:table-column-properties style:column-width="7.9in" style:rel-column-width="65535*"/>
    </style:style>
    <style:style style:name="Table2.A1" style:family="table-cell">
      <style:table-cell-properties fo:padding="0.0382in" fo:border="0.5pt solid #000000"/>
    </style:style>
    <style:style style:name="Table3" style:family="table">
      <style:table-properties style:width="7.9in" table:align="margins"/>
    </style:style>
    <style:style style:name="Table3.A" style:family="table-column">
      <style:table-column-properties style:column-width="3.7243in" style:rel-column-width="30898*"/>
    </style:style>
    <style:style style:name="Table3.B" style:family="table-column">
      <style:table-column-properties style:column-width="4.1757in" style:rel-column-width="34637*"/>
    </style:style>
    <style:style style:name="Table3.1" style:family="table-row">
      <style:table-row-properties fo:keep-together="always"/>
    </style:style>
    <style:style style:name="Table3.A1" style:family="table-cell">
      <style:table-cell-properties fo:padding="0.0382in" fo:border-left="0.75pt solid #000000" fo:border-right="none" fo:border-top="0.75pt solid #000000" fo:border-bottom="0.75pt solid #000000"/>
    </style:style>
    <style:style style:name="Table3.B1" style:family="table-cell">
      <style:table-cell-properties style:vertical-align="middle" fo:padding="0.0382in" fo:border="0.75pt solid #000000"/>
    </style:style>
    <style:style style:name="Table3.A2" style:family="table-cell">
      <style:table-cell-properties fo:padding="0.0382in" fo:border-left="0.75pt solid #000000" fo:border-right="none" fo:border-top="none" fo:border-bottom="0.75pt solid #000000"/>
    </style:style>
    <style:style style:name="Table3.B2" style:family="table-cell">
      <style:table-cell-properties style:vertical-align="middle" fo:padding="0.0382in" fo:border-left="0.75pt solid #000000" fo:border-right="0.75pt solid #000000" fo:border-top="none" fo:border-bottom="0.75pt solid #000000"/>
    </style:style>
    <style:style style:name="Table3.A3" style:family="table-cell">
      <style:table-cell-properties fo:padding="0.0382in" fo:border-left="0.75pt solid #000000" fo:border-right="none" fo:border-top="none" fo:border-bottom="0.75pt solid #000000"/>
    </style:style>
    <style:style style:name="Table3.A4" style:family="table-cell">
      <style:table-cell-properties fo:padding="0.0382in" fo:border-left="0.75pt solid #000000" fo:border-right="none" fo:border-top="none" fo:border-bottom="0.75pt solid #000000"/>
    </style:style>
    <style:style style:name="Table3.A5" style:family="table-cell">
      <style:table-cell-properties fo:padding="0.0382in" fo:border-left="0.75pt solid #000000" fo:border-right="none" fo:border-top="none" fo:border-bottom="0.75pt solid #000000"/>
    </style:style>
    <style:style style:name="Table5" style:family="table">
      <style:table-properties style:width="7.9in" table:align="margins"/>
    </style:style>
    <style:style style:name="Table5.A" style:family="table-column">
      <style:table-column-properties style:column-width="7.9in" style:rel-column-width="65535*"/>
    </style:style>
    <style:style style:name="Table5.A1" style:family="table-cell">
      <style:table-cell-properties fo:padding="0.0382in" fo:border="0.5pt solid #000000"/>
    </style:style>
    <style:style style:name="Table7" style:family="table">
      <style:table-properties style:width="7.9in" table:align="margins"/>
    </style:style>
    <style:style style:name="Table7.A" style:family="table-column">
      <style:table-column-properties style:column-width="7.9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7.9in" table:align="margins"/>
    </style:style>
    <style:style style:name="Table8.A" style:family="table-column">
      <style:table-column-properties style:column-width="7.9in" style:rel-column-width="65535*"/>
    </style:style>
    <style:style style:name="Table8.A1" style:family="table-cell">
      <style:table-cell-properties fo:padding="0.0382in" fo:border="0.5pt solid #000000"/>
    </style:style>
    <style:style style:name="Table9" style:family="table">
      <style:table-properties style:width="7.9in" table:align="margins"/>
    </style:style>
    <style:style style:name="Table9.A" style:family="table-column">
      <style:table-column-properties style:column-width="7.9in" style:rel-column-width="65535*"/>
    </style:style>
    <style:style style:name="Table9.A1" style:family="table-cell">
      <style:table-cell-properties fo:padding="0.0382in" fo:border="0.5pt solid #000000"/>
    </style:style>
    <style:style style:name="Table4" style:family="table">
      <style:table-properties style:width="7.9in" table:align="margins"/>
    </style:style>
    <style:style style:name="Table4.A" style:family="table-column">
      <style:table-column-properties style:column-width="3.95in" style:rel-column-width="32767*"/>
    </style:style>
    <style:style style:name="Table4.B" style:family="table-column">
      <style:table-column-properties style:column-width="3.95in" style:rel-column-width="32768*"/>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Gabriela" officeooo:rsid="001de6b4" officeooo:paragraph-rsid="001de6b4"/>
    </style:style>
    <style:style style:name="P2" style:family="paragraph" style:parent-style-name="Standard">
      <style:text-properties officeooo:rsid="001e5802" officeooo:paragraph-rsid="00354b9c"/>
    </style:style>
    <style:style style:name="P3" style:family="paragraph" style:parent-style-name="Standard">
      <style:text-properties officeooo:rsid="00c08f29" officeooo:paragraph-rsid="00354b9c"/>
    </style:style>
    <style:style style:name="P4" style:family="paragraph" style:parent-style-name="Standard">
      <style:text-properties officeooo:rsid="00c08f29" officeooo:paragraph-rsid="00c08f29"/>
    </style:style>
    <style:style style:name="P5" style:family="paragraph" style:parent-style-name="Standard">
      <style:text-properties officeooo:rsid="001e5802" officeooo:paragraph-rsid="00c08f29"/>
    </style:style>
    <style:style style:name="P6" style:family="paragraph" style:parent-style-name="Standard">
      <style:text-properties officeooo:rsid="001e5802" officeooo:paragraph-rsid="0165d5fd"/>
    </style:style>
    <style:style style:name="P7" style:family="paragraph" style:parent-style-name="Standard">
      <style:text-properties officeooo:rsid="001e5802" officeooo:paragraph-rsid="002f6ad7"/>
    </style:style>
    <style:style style:name="P8" style:family="paragraph" style:parent-style-name="Standard">
      <style:text-properties officeooo:rsid="001e5802" officeooo:paragraph-rsid="001e5802"/>
    </style:style>
    <style:style style:name="P9" style:family="paragraph" style:parent-style-name="Standard">
      <style:paragraph-properties fo:margin-left="0.4925in" fo:text-indent="0in" style:auto-text-indent="false"/>
      <style:text-properties officeooo:rsid="001e5802" officeooo:paragraph-rsid="002029ab"/>
    </style:style>
    <style:style style:name="P10" style:family="paragraph" style:parent-style-name="Standard">
      <style:text-properties officeooo:rsid="001e5802" officeooo:paragraph-rsid="002029ab"/>
    </style:style>
    <style:style style:name="P11" style:family="paragraph" style:parent-style-name="Standard">
      <style:text-properties officeooo:rsid="002366f9" officeooo:paragraph-rsid="0026e97f"/>
    </style:style>
    <style:style style:name="P12" style:family="paragraph" style:parent-style-name="Standard">
      <style:text-properties officeooo:rsid="0029f88e" officeooo:paragraph-rsid="002c596d"/>
    </style:style>
    <style:style style:name="P13" style:family="paragraph" style:parent-style-name="Standard">
      <style:text-properties officeooo:rsid="0029f88e" officeooo:paragraph-rsid="01714e4e"/>
    </style:style>
    <style:style style:name="P14" style:family="paragraph" style:parent-style-name="Standard">
      <style:text-properties officeooo:rsid="016dea63" officeooo:paragraph-rsid="01536c44"/>
    </style:style>
    <style:style style:name="P15" style:family="paragraph" style:parent-style-name="Standard">
      <style:text-properties officeooo:rsid="00491a68" officeooo:paragraph-rsid="00491a68"/>
    </style:style>
    <style:style style:name="P16" style:family="paragraph" style:parent-style-name="Standard">
      <style:text-properties officeooo:rsid="0065b1d8" officeooo:paragraph-rsid="0065b1d8"/>
    </style:style>
    <style:style style:name="P17" style:family="paragraph" style:parent-style-name="Standard" style:list-style-name="L1">
      <style:text-properties officeooo:rsid="0065b1d8" officeooo:paragraph-rsid="0065b1d8"/>
    </style:style>
    <style:style style:name="P18" style:family="paragraph" style:parent-style-name="Standard" style:list-style-name="L1">
      <style:text-properties officeooo:rsid="0065b1d8" officeooo:paragraph-rsid="01720eff"/>
    </style:style>
    <style:style style:name="P19" style:family="paragraph" style:parent-style-name="Standard" style:list-style-name="L2">
      <style:text-properties officeooo:paragraph-rsid="01720eff"/>
    </style:style>
    <style:style style:name="P20" style:family="paragraph" style:parent-style-name="Standard" style:list-style-name="L1">
      <style:text-properties officeooo:rsid="0065b1d8" officeooo:paragraph-rsid="0172870e"/>
    </style:style>
    <style:style style:name="P21" style:family="paragraph" style:parent-style-name="Standard" style:list-style-name="L3">
      <style:text-properties officeooo:paragraph-rsid="0172870e"/>
    </style:style>
    <style:style style:name="P22" style:family="paragraph" style:parent-style-name="Standard">
      <style:text-properties officeooo:rsid="0078a2b3" officeooo:paragraph-rsid="0078a2b3"/>
    </style:style>
    <style:style style:name="P23" style:family="paragraph" style:parent-style-name="Standard">
      <style:text-properties officeooo:rsid="00661d0f" officeooo:paragraph-rsid="00491a68"/>
    </style:style>
    <style:style style:name="P24" style:family="paragraph" style:parent-style-name="Standard">
      <style:text-properties officeooo:rsid="0084e45a" officeooo:paragraph-rsid="0084e45a"/>
    </style:style>
    <style:style style:name="P25" style:family="paragraph" style:parent-style-name="Table_20_Contents">
      <style:text-properties officeooo:rsid="00918eba" officeooo:paragraph-rsid="00918eba"/>
    </style:style>
    <style:style style:name="P26" style:family="paragraph" style:parent-style-name="Table_20_Contents">
      <style:text-properties officeooo:rsid="00b32bcb" officeooo:paragraph-rsid="00b32bcb"/>
    </style:style>
    <style:style style:name="P27" style:family="paragraph" style:parent-style-name="Table_20_Contents">
      <style:text-properties officeooo:rsid="0093731c" officeooo:paragraph-rsid="00a1532b"/>
    </style:style>
    <style:style style:name="P28" style:family="paragraph" style:parent-style-name="Table_20_Contents">
      <style:text-properties officeooo:rsid="0090620d" officeooo:paragraph-rsid="0090620d"/>
    </style:style>
    <style:style style:name="P29" style:family="paragraph" style:parent-style-name="Table_20_Contents">
      <style:text-properties officeooo:rsid="0093731c" officeooo:paragraph-rsid="00b59cc4"/>
    </style:style>
    <style:style style:name="P30" style:family="paragraph" style:parent-style-name="Table_20_Contents">
      <style:text-properties officeooo:paragraph-rsid="00962122"/>
    </style:style>
    <style:style style:name="P31" style:family="paragraph" style:parent-style-name="Table_20_Contents">
      <style:text-properties officeooo:rsid="00962122" officeooo:paragraph-rsid="00962122"/>
    </style:style>
    <style:style style:name="P32" style:family="paragraph" style:parent-style-name="Table_20_Contents">
      <style:text-properties officeooo:rsid="0096df55" officeooo:paragraph-rsid="0096df55"/>
    </style:style>
    <style:style style:name="P33" style:family="paragraph" style:parent-style-name="Table_20_Contents">
      <style:text-properties officeooo:paragraph-rsid="00a0edbd"/>
    </style:style>
    <style:style style:name="P34" style:family="paragraph" style:parent-style-name="Table_20_Contents">
      <style:text-properties officeooo:rsid="00e59a27" officeooo:paragraph-rsid="00e59a27"/>
    </style:style>
    <style:style style:name="P35" style:family="paragraph" style:parent-style-name="Table_20_Contents">
      <style:text-properties officeooo:rsid="009bc96c" officeooo:paragraph-rsid="009bc96c"/>
    </style:style>
    <style:style style:name="P36" style:family="paragraph" style:parent-style-name="Standard">
      <style:text-properties officeooo:rsid="00661d0f" officeooo:paragraph-rsid="0084e45a"/>
    </style:style>
    <style:style style:name="P37" style:family="paragraph" style:parent-style-name="Standard">
      <style:text-properties officeooo:rsid="017ad6ed" officeooo:paragraph-rsid="017ad6ed"/>
    </style:style>
    <style:style style:name="P38" style:family="paragraph" style:parent-style-name="Standard">
      <style:text-properties officeooo:rsid="00f116a1" officeooo:paragraph-rsid="00f116a1"/>
    </style:style>
    <style:style style:name="P39" style:family="paragraph" style:parent-style-name="Standard">
      <style:paragraph-properties fo:text-align="center" style:justify-single-word="false"/>
      <style:text-properties officeooo:rsid="0139b105" officeooo:paragraph-rsid="0139b105"/>
    </style:style>
    <style:style style:name="P40" style:family="paragraph" style:parent-style-name="Standard">
      <style:text-properties officeooo:rsid="0136900c" officeooo:paragraph-rsid="00f116a1"/>
    </style:style>
    <style:style style:name="P41" style:family="paragraph" style:parent-style-name="Table_20_Contents">
      <style:text-properties officeooo:paragraph-rsid="0137618e"/>
    </style:style>
    <style:style style:name="P42" style:family="paragraph" style:parent-style-name="Standard">
      <style:text-properties officeooo:rsid="0139b105" officeooo:paragraph-rsid="0139b105"/>
    </style:style>
    <style:style style:name="P43" style:family="paragraph" style:parent-style-name="Standard">
      <style:text-properties officeooo:rsid="013b3efe" officeooo:paragraph-rsid="013b3efe"/>
    </style:style>
    <style:style style:name="P44" style:family="paragraph" style:parent-style-name="Standard">
      <style:text-properties officeooo:rsid="013da189" officeooo:paragraph-rsid="013da189"/>
    </style:style>
    <style:style style:name="P45" style:family="paragraph" style:parent-style-name="Standard">
      <style:paragraph-properties fo:text-align="center" style:justify-single-word="false"/>
      <style:text-properties officeooo:rsid="013da189" officeooo:paragraph-rsid="013da189"/>
    </style:style>
    <style:style style:name="P46" style:family="paragraph" style:parent-style-name="Standard">
      <style:text-properties officeooo:rsid="01452dcc" officeooo:paragraph-rsid="01452dcc"/>
    </style:style>
    <style:style style:name="P47" style:family="paragraph" style:parent-style-name="Table_20_Contents">
      <style:text-properties fo:color="#127622" loext:opacity="100%"/>
    </style:style>
    <style:style style:name="P48" style:family="paragraph" style:parent-style-name="Table_20_Contents">
      <style:text-properties officeooo:paragraph-rsid="01489ba2"/>
    </style:style>
    <style:style style:name="P49" style:family="paragraph" style:parent-style-name="Table_20_Contents">
      <style:text-properties officeooo:paragraph-rsid="014c5574"/>
    </style:style>
    <style:style style:name="P50" style:family="paragraph" style:parent-style-name="Standard" style:list-style-name="L4">
      <style:text-properties officeooo:rsid="01470838" officeooo:paragraph-rsid="01470838"/>
    </style:style>
    <style:style style:name="P51" style:family="paragraph" style:parent-style-name="Standard" style:list-style-name="L4">
      <style:text-properties officeooo:rsid="01489ba2" officeooo:paragraph-rsid="01489ba2"/>
    </style:style>
    <style:style style:name="P52" style:family="paragraph" style:parent-style-name="Standard" style:list-style-name="L5">
      <style:text-properties officeooo:rsid="01489ba2" officeooo:paragraph-rsid="01489ba2"/>
    </style:style>
    <style:style style:name="P53" style:family="paragraph" style:parent-style-name="Standard" style:list-style-name="L4">
      <style:text-properties officeooo:rsid="014c5574" officeooo:paragraph-rsid="014c5574"/>
    </style:style>
    <style:style style:name="P54" style:family="paragraph" style:parent-style-name="Standard" style:list-style-name="L6">
      <style:text-properties officeooo:rsid="014c5574" officeooo:paragraph-rsid="014c5574"/>
    </style:style>
    <style:style style:name="P55" style:family="paragraph" style:parent-style-name="Standard" style:list-style-name="L4">
      <style:text-properties officeooo:rsid="014ce5f3" officeooo:paragraph-rsid="014ce5f3"/>
    </style:style>
    <style:style style:name="P56" style:family="paragraph" style:parent-style-name="Standard" style:list-style-name="L7">
      <style:text-properties officeooo:rsid="014ce5f3" officeooo:paragraph-rsid="014ce5f3"/>
    </style:style>
    <style:style style:name="P57" style:family="paragraph" style:parent-style-name="Standard">
      <style:text-properties officeooo:rsid="00b8b32e" officeooo:paragraph-rsid="00b8b32e"/>
    </style:style>
    <style:style style:name="P58" style:family="paragraph" style:parent-style-name="Table_20_Contents">
      <style:paragraph-properties fo:text-align="center" style:justify-single-word="false"/>
      <style:text-properties fo:font-weight="bold" officeooo:rsid="00b8b32e" officeooo:paragraph-rsid="00b8b32e" style:font-weight-asian="bold" style:font-weight-complex="bold"/>
    </style:style>
    <style:style style:name="P59" style:family="paragraph" style:parent-style-name="Table_20_Contents">
      <style:paragraph-properties fo:text-align="center" style:justify-single-word="false"/>
      <style:text-properties officeooo:rsid="00b8b32e" officeooo:paragraph-rsid="00b8b32e"/>
    </style:style>
    <style:style style:name="P60" style:family="paragraph" style:parent-style-name="Table_20_Contents">
      <style:text-properties officeooo:rsid="00b8b32e" officeooo:paragraph-rsid="00b8b32e"/>
    </style:style>
    <style:style style:name="P61" style:family="paragraph" style:parent-style-name="Standard">
      <style:text-properties officeooo:rsid="00b8db77" officeooo:paragraph-rsid="00b8b32e"/>
    </style:style>
    <style:style style:name="P62" style:family="paragraph" style:parent-style-name="Standard">
      <style:text-properties officeooo:rsid="01128f89" officeooo:paragraph-rsid="01128f89"/>
    </style:style>
    <style:style style:name="P63" style:family="paragraph" style:parent-style-name="Standard">
      <style:text-properties officeooo:rsid="00b8db77" officeooo:paragraph-rsid="00b8db77"/>
    </style:style>
    <style:style style:name="P64" style:family="paragraph" style:parent-style-name="Standard">
      <style:text-properties officeooo:rsid="00ebe8cf" officeooo:paragraph-rsid="00ebe8cf"/>
    </style:style>
    <style:style style:name="T1" style:family="text">
      <style:text-properties officeooo:rsid="00bc04c9"/>
    </style:style>
    <style:style style:name="T2" style:family="text">
      <style:text-properties fo:color="#127622" loext:opacity="100%"/>
    </style:style>
    <style:style style:name="T3" style:family="text">
      <style:text-properties fo:color="#ff0000" loext:opacity="100%"/>
    </style:style>
    <style:style style:name="T4" style:family="text">
      <style:text-properties fo:color="#ff0000" loext:opacity="100%" fo:background-color="#fff5ce" loext:char-shading-value="0"/>
    </style:style>
    <style:style style:name="T5" style:family="text">
      <style:text-properties officeooo:rsid="003735fd"/>
    </style:style>
    <style:style style:name="T6" style:family="text">
      <style:text-properties officeooo:rsid="0038fb74"/>
    </style:style>
    <style:style style:name="T7" style:family="text">
      <style:text-properties officeooo:rsid="00354b9c"/>
    </style:style>
    <style:style style:name="T8" style:family="text">
      <style:text-properties fo:font-weight="bold" officeooo:rsid="00354b9c" style:font-weight-asian="bold" style:font-weight-complex="bold"/>
    </style:style>
    <style:style style:name="T9" style:family="text">
      <style:text-properties officeooo:rsid="0036b30e"/>
    </style:style>
    <style:style style:name="T10" style:family="text">
      <style:text-properties officeooo:rsid="014d9b04"/>
    </style:style>
    <style:style style:name="T11" style:family="text">
      <style:text-properties fo:background-color="#fff5ce" loext:char-shading-value="0"/>
    </style:style>
    <style:style style:name="T12" style:family="text">
      <style:text-properties officeooo:rsid="014de7bd"/>
    </style:style>
    <style:style style:name="T13" style:family="text">
      <style:text-properties officeooo:rsid="01648c85"/>
    </style:style>
    <style:style style:name="T14" style:family="text">
      <style:text-properties officeooo:rsid="003ad827"/>
    </style:style>
    <style:style style:name="T15" style:family="text">
      <style:text-properties officeooo:rsid="00fd8174"/>
    </style:style>
    <style:style style:name="T16" style:family="text">
      <style:text-properties officeooo:rsid="002f6ad7"/>
    </style:style>
    <style:style style:name="T17" style:family="text">
      <style:text-properties officeooo:rsid="003ffe03"/>
    </style:style>
    <style:style style:name="T18" style:family="text">
      <style:text-properties officeooo:rsid="003dd19c"/>
    </style:style>
    <style:style style:name="T19" style:family="text">
      <style:text-properties officeooo:rsid="003f72c3"/>
    </style:style>
    <style:style style:name="T20" style:family="text">
      <style:text-properties officeooo:rsid="0045fcf8"/>
    </style:style>
    <style:style style:name="T21" style:family="text">
      <style:text-properties officeooo:rsid="0041193b"/>
    </style:style>
    <style:style style:name="T22" style:family="text">
      <style:text-properties officeooo:rsid="00430db6"/>
    </style:style>
    <style:style style:name="T23" style:family="text">
      <style:text-properties officeooo:rsid="004dc84f"/>
    </style:style>
    <style:style style:name="T24" style:family="text">
      <style:text-properties officeooo:rsid="00c56e07"/>
    </style:style>
    <style:style style:name="T25" style:family="text">
      <style:text-properties fo:font-weight="bold" officeooo:rsid="003f72c3" style:font-weight-asian="bold" style:font-weight-complex="bold"/>
    </style:style>
    <style:style style:name="T26" style:family="text">
      <style:text-properties officeooo:rsid="00434d67"/>
    </style:style>
    <style:style style:name="T27" style:family="text">
      <style:text-properties officeooo:rsid="002257c4"/>
    </style:style>
    <style:style style:name="T28" style:family="text">
      <style:text-properties officeooo:rsid="002029ab"/>
    </style:style>
    <style:style style:name="T29" style:family="text">
      <style:text-properties officeooo:rsid="00ace04d"/>
    </style:style>
    <style:style style:name="T30" style:family="text">
      <style:text-properties officeooo:rsid="00435e12"/>
    </style:style>
    <style:style style:name="T31" style:family="text">
      <style:text-properties officeooo:rsid="00c65d41"/>
    </style:style>
    <style:style style:name="T32" style:family="text">
      <style:text-properties officeooo:rsid="00c72abb"/>
    </style:style>
    <style:style style:name="T33" style:family="text">
      <style:text-properties officeooo:rsid="00217424"/>
    </style:style>
    <style:style style:name="T34" style:family="text">
      <style:text-properties officeooo:rsid="00c8acf5"/>
    </style:style>
    <style:style style:name="T35" style:family="text">
      <style:text-properties officeooo:rsid="01684654"/>
    </style:style>
    <style:style style:name="T36" style:family="text">
      <style:text-properties officeooo:rsid="00cb0977"/>
    </style:style>
    <style:style style:name="T37" style:family="text">
      <style:text-properties officeooo:rsid="00ca16a3"/>
    </style:style>
    <style:style style:name="T38" style:family="text">
      <style:text-properties officeooo:rsid="01257638"/>
    </style:style>
    <style:style style:name="T39" style:family="text">
      <style:text-properties officeooo:rsid="0026e97f"/>
    </style:style>
    <style:style style:name="T40" style:family="text">
      <style:text-properties officeooo:rsid="00443cf9"/>
    </style:style>
    <style:style style:name="T41" style:family="text">
      <style:text-properties officeooo:rsid="005f02dc"/>
    </style:style>
    <style:style style:name="T42" style:family="text">
      <style:text-properties officeooo:rsid="005cd9d3"/>
    </style:style>
    <style:style style:name="T43" style:family="text">
      <style:text-properties officeooo:rsid="005db780"/>
    </style:style>
    <style:style style:name="T44" style:family="text">
      <style:text-properties officeooo:rsid="0168eee9"/>
    </style:style>
    <style:style style:name="T45" style:family="text">
      <style:text-properties officeooo:rsid="014ed318"/>
    </style:style>
    <style:style style:name="T46" style:family="text">
      <style:text-properties officeooo:rsid="002b2e6a"/>
    </style:style>
    <style:style style:name="T47" style:family="text">
      <style:text-properties officeooo:rsid="002c596d"/>
    </style:style>
    <style:style style:name="T48" style:family="text">
      <style:text-properties officeooo:rsid="0046ccec"/>
    </style:style>
    <style:style style:name="T49" style:family="text">
      <style:text-properties fo:font-weight="bold" officeooo:rsid="002c596d" style:font-weight-asian="bold" style:font-weight-complex="bold"/>
    </style:style>
    <style:style style:name="T50" style:family="text">
      <style:text-properties officeooo:rsid="016a9f30"/>
    </style:style>
    <style:style style:name="T51" style:family="text">
      <style:text-properties fo:color="#127622" loext:opacity="100%" officeooo:rsid="016c4937"/>
    </style:style>
    <style:style style:name="T52" style:family="text">
      <style:text-properties officeooo:rsid="002e581e"/>
    </style:style>
    <style:style style:name="T53" style:family="text">
      <style:text-properties officeooo:rsid="002b5a26"/>
    </style:style>
    <style:style style:name="T54" style:family="text">
      <style:text-properties officeooo:rsid="016fb4c1"/>
    </style:style>
    <style:style style:name="T55" style:family="text">
      <style:text-properties officeooo:rsid="016f306c"/>
    </style:style>
    <style:style style:name="T56" style:family="text">
      <style:text-properties fo:font-style="italic" officeooo:rsid="016f306c" style:font-style-asian="italic" style:font-style-complex="italic"/>
    </style:style>
    <style:style style:name="T57" style:family="text">
      <style:text-properties officeooo:rsid="002ea544"/>
    </style:style>
    <style:style style:name="T58" style:family="text">
      <style:text-properties officeooo:rsid="0047b8d7"/>
    </style:style>
    <style:style style:name="T59" style:family="text">
      <style:text-properties fo:font-weight="bold" officeooo:rsid="0047b8d7" style:font-weight-asian="bold" style:font-weight-complex="bold"/>
    </style:style>
    <style:style style:name="T60" style:family="text">
      <style:text-properties style:text-position="super 58%"/>
    </style:style>
    <style:style style:name="T61" style:family="text">
      <style:text-properties fo:color="#2a6099" loext:opacity="100%"/>
    </style:style>
    <style:style style:name="T62" style:family="text">
      <style:text-properties fo:color="#55308d" loext:opacity="100%"/>
    </style:style>
    <style:style style:name="T63" style:family="text">
      <style:text-properties fo:background-color="#ffbf00" loext:char-shading-value="0"/>
    </style:style>
    <style:style style:name="T64" style:family="text">
      <style:text-properties fo:color="#55308d" loext:opacity="100%" fo:background-color="#ffff00" loext:char-shading-value="0"/>
    </style:style>
    <style:style style:name="T65" style:family="text">
      <style:text-properties officeooo:rsid="00a2fac2"/>
    </style:style>
    <style:style style:name="T66" style:family="text">
      <style:text-properties fo:font-weight="normal" style:font-weight-asian="normal" style:font-weight-complex="normal"/>
    </style:style>
    <style:style style:name="T67" style:family="text">
      <style:text-properties fo:font-weight="bold" style:font-weight-asian="bold" style:font-weight-complex="bold"/>
    </style:style>
    <style:style style:name="T68" style:family="text">
      <style:text-properties officeooo:rsid="00a3d85b"/>
    </style:style>
    <style:style style:name="T69" style:family="text">
      <style:text-properties officeooo:rsid="01285134"/>
    </style:style>
    <style:style style:name="T70" style:family="text">
      <style:text-properties fo:font-weight="bold" officeooo:rsid="01285134" style:font-weight-asian="bold" style:font-weight-complex="bold"/>
    </style:style>
    <style:style style:name="T71" style:family="text">
      <style:text-properties officeooo:rsid="01720eff"/>
    </style:style>
    <style:style style:name="T72" style:family="text">
      <style:text-properties officeooo:rsid="0082c74e"/>
    </style:style>
    <style:style style:name="T73" style:family="text">
      <style:text-properties officeooo:rsid="00ddd475"/>
    </style:style>
    <style:style style:name="T74" style:family="text">
      <style:text-properties fo:font-weight="bold" officeooo:rsid="0082c74e" style:font-weight-asian="bold" style:font-weight-complex="bold"/>
    </style:style>
    <style:style style:name="T75" style:family="text">
      <style:text-properties officeooo:rsid="00dc042c"/>
    </style:style>
    <style:style style:name="T76" style:family="text">
      <style:text-properties officeooo:rsid="00ab9ac1"/>
    </style:style>
    <style:style style:name="T77" style:family="text">
      <style:text-properties officeooo:rsid="01725f88"/>
    </style:style>
    <style:style style:name="T78" style:family="text">
      <style:text-properties officeooo:rsid="0172870e"/>
    </style:style>
    <style:style style:name="T79" style:family="text">
      <style:text-properties officeooo:rsid="00a71d59"/>
    </style:style>
    <style:style style:name="T80" style:family="text">
      <style:text-properties officeooo:rsid="00a82e4e"/>
    </style:style>
    <style:style style:name="T81" style:family="text">
      <style:text-properties officeooo:rsid="00a93d31"/>
    </style:style>
    <style:style style:name="T82" style:family="text">
      <style:text-properties officeooo:rsid="007a8a66"/>
    </style:style>
    <style:style style:name="T83" style:family="text">
      <style:text-properties officeooo:rsid="01743894"/>
    </style:style>
    <style:style style:name="T84" style:family="text">
      <style:text-properties officeooo:rsid="0080fcc3"/>
    </style:style>
    <style:style style:name="T85" style:family="text">
      <style:text-properties officeooo:rsid="012b122a"/>
    </style:style>
    <style:style style:name="T86" style:family="text">
      <style:text-properties officeooo:rsid="0176079c"/>
    </style:style>
    <style:style style:name="T87" style:family="text">
      <style:text-properties officeooo:rsid="0081dcfd"/>
    </style:style>
    <style:style style:name="T88" style:family="text">
      <style:text-properties officeooo:rsid="00ab2b55"/>
    </style:style>
    <style:style style:name="T89" style:family="text">
      <style:text-properties fo:font-style="italic" officeooo:rsid="00ae81d8" style:font-style-asian="italic" style:font-style-complex="italic"/>
    </style:style>
    <style:style style:name="T90" style:family="text">
      <style:text-properties fo:color="#ff0000" loext:opacity="100%" officeooo:rsid="00ae81d8"/>
    </style:style>
    <style:style style:name="T91" style:family="text">
      <style:text-properties fo:font-style="italic" style:font-style-asian="italic" style:font-style-complex="italic"/>
    </style:style>
    <style:style style:name="T92" style:family="text">
      <style:text-properties officeooo:rsid="00e1f926"/>
    </style:style>
    <style:style style:name="T93" style:family="text">
      <style:text-properties officeooo:rsid="00862a50"/>
    </style:style>
    <style:style style:name="T94" style:family="text">
      <style:text-properties fo:font-style="italic" officeooo:rsid="00862a50" style:font-style-asian="italic" style:font-style-complex="italic"/>
    </style:style>
    <style:style style:name="T95" style:family="text">
      <style:text-properties fo:background-color="#ffff00" loext:char-shading-value="0"/>
    </style:style>
    <style:style style:name="T96" style:family="text">
      <style:text-properties fo:font-weight="bold" fo:background-color="#ffff00" loext:char-shading-value="0" style:font-weight-asian="bold" style:font-weight-complex="bold"/>
    </style:style>
    <style:style style:name="T97" style:family="text">
      <style:text-properties officeooo:rsid="00b38f32"/>
    </style:style>
    <style:style style:name="T98" style:family="text">
      <style:text-properties officeooo:rsid="00b3dc0c"/>
    </style:style>
    <style:style style:name="T99" style:family="text">
      <style:text-properties officeooo:rsid="012c7c05"/>
    </style:style>
    <style:style style:name="T100" style:family="text">
      <style:text-properties officeooo:rsid="00b44d29"/>
    </style:style>
    <style:style style:name="T101" style:family="text">
      <style:text-properties fo:color="#ff0000" loext:opacity="100%" fo:font-weight="bold" style:font-weight-asian="bold" style:font-weight-complex="bold"/>
    </style:style>
    <style:style style:name="T102" style:family="text">
      <style:text-properties fo:color="#ff0000" loext:opacity="100%" fo:background-color="#ffff00" loext:char-shading-value="0"/>
    </style:style>
    <style:style style:name="T103" style:family="text">
      <style:text-properties officeooo:rsid="00a0edbd"/>
    </style:style>
    <style:style style:name="T104" style:family="text">
      <style:text-properties officeooo:rsid="00b59cc4"/>
    </style:style>
    <style:style style:name="T105" style:family="text">
      <style:text-properties fo:color="#127622" loext:opacity="100%" officeooo:rsid="00996ee0"/>
    </style:style>
    <style:style style:name="T106" style:family="text">
      <style:text-properties officeooo:rsid="00962122"/>
    </style:style>
    <style:style style:name="T107" style:family="text">
      <style:text-properties officeooo:rsid="00b7205a"/>
    </style:style>
    <style:style style:name="T108" style:family="text">
      <style:text-properties officeooo:rsid="00e2b086"/>
    </style:style>
    <style:style style:name="T109" style:family="text">
      <style:text-properties officeooo:rsid="010af89a"/>
    </style:style>
    <style:style style:name="T110" style:family="text">
      <style:text-properties officeooo:rsid="012e69be"/>
    </style:style>
    <style:style style:name="T111" style:family="text">
      <style:text-properties officeooo:rsid="0109ffa4"/>
    </style:style>
    <style:style style:name="T112" style:family="text">
      <style:text-properties fo:color="#127622" loext:opacity="100%" officeooo:rsid="0109ffa4"/>
    </style:style>
    <style:style style:name="T113" style:family="text">
      <style:text-properties fo:color="#127622" loext:opacity="100%" officeooo:rsid="00b7205a"/>
    </style:style>
    <style:style style:name="T114" style:family="text">
      <style:text-properties officeooo:rsid="010c6480"/>
    </style:style>
    <style:style style:name="T115" style:family="text">
      <style:text-properties officeooo:rsid="0097f08a"/>
    </style:style>
    <style:style style:name="T116" style:family="text">
      <style:text-properties fo:color="#127622" loext:opacity="100%" officeooo:rsid="009f9f2a"/>
    </style:style>
    <style:style style:name="T117" style:family="text">
      <style:text-properties officeooo:rsid="00e6545d"/>
    </style:style>
    <style:style style:name="T118" style:family="text">
      <style:text-properties officeooo:rsid="00f14da2"/>
    </style:style>
    <style:style style:name="T119" style:family="text">
      <style:text-properties officeooo:rsid="00f116a1"/>
    </style:style>
    <style:style style:name="T120" style:family="text">
      <style:text-properties officeooo:rsid="0132e20e"/>
    </style:style>
    <style:style style:name="T121" style:family="text">
      <style:text-properties officeooo:rsid="017a9472"/>
    </style:style>
    <style:style style:name="T122" style:family="text">
      <style:text-properties officeooo:rsid="013a82cd"/>
    </style:style>
    <style:style style:name="T123" style:family="text">
      <style:text-properties fo:color="#127622" loext:opacity="100%" officeooo:rsid="013a82cd"/>
    </style:style>
    <style:style style:name="T124" style:family="text">
      <style:text-properties officeooo:rsid="013b3efe"/>
    </style:style>
    <style:style style:name="T125" style:family="text">
      <style:text-properties officeooo:rsid="013cc00b"/>
    </style:style>
    <style:style style:name="T126" style:family="text">
      <style:text-properties officeooo:rsid="01431ff3"/>
    </style:style>
    <style:style style:name="T127" style:family="text">
      <style:text-properties officeooo:rsid="013f6da8"/>
    </style:style>
    <style:style style:name="T128" style:family="text">
      <style:text-properties officeooo:rsid="014489b6"/>
    </style:style>
    <style:style style:name="T129" style:family="text">
      <style:text-properties officeooo:rsid="01489ba2"/>
    </style:style>
    <style:style style:name="T130" style:family="text">
      <style:text-properties officeooo:rsid="00f44d08"/>
    </style:style>
    <style:style style:name="T131" style:family="text">
      <style:text-properties officeooo:rsid="0115d90a"/>
    </style:style>
    <style:style style:name="T132" style:family="text">
      <style:text-properties officeooo:rsid="0113f772"/>
    </style:style>
    <style:style style:name="T133" style:family="text">
      <style:text-properties fo:color="#127622" loext:opacity="100%" officeooo:rsid="0113f772"/>
    </style:style>
    <style:style style:name="T134" style:family="text">
      <style:text-properties officeooo:rsid="0116dfc6"/>
    </style:style>
    <style:style style:name="T135" style:family="text">
      <style:text-properties officeooo:rsid="0114bd34"/>
    </style:style>
    <style:style style:name="T136" style:family="text">
      <style:text-properties officeooo:rsid="0118219e"/>
    </style:style>
    <style:style style:name="T137" style:family="text">
      <style:text-properties officeooo:rsid="00ed4456"/>
    </style:style>
    <style:style style:name="T138" style:family="text">
      <style:text-properties officeooo:rsid="011cd70e"/>
    </style:style>
    <style:style style:name="T139" style:family="text">
      <style:text-properties officeooo:rsid="0118d010"/>
    </style:style>
    <style:style style:name="T140" style:family="text">
      <style:text-properties officeooo:rsid="01201103"/>
    </style:style>
    <style:style style:name="T141" style:family="text">
      <style:text-properties officeooo:rsid="0119a906"/>
    </style:style>
    <style:style style:name="T142" style:family="text">
      <style:text-properties fo:color="#127622" loext:opacity="100%" officeooo:rsid="0119a906"/>
    </style:style>
    <style:style style:name="T143" style:family="text">
      <style:text-properties officeooo:rsid="01300331"/>
    </style:style>
    <style:style style:name="T144" style:family="text">
      <style:text-properties officeooo:rsid="01327f3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hat is m</text:span>arriage?</text:p>
      <text:p text:style-name="Standard"/>
      <text:p text:style-name="Standard"/>
      <table:table table:name="Table1" table:style-name="Table1">
        <table:table-column table:style-name="Table1.A"/>
        <table:table-row>
          <table:table-cell table:style-name="Table1.A1" office:value-type="string">
            <text:p text:style-name="Table_20_Contents"><text:span text:style-name="T2">Mark 7:7</text:span><text:line-break/><text:span text:style-name="T3">Howbeit in vain do they worship me, </text:span><text:span text:style-name="T4">teaching for doctrines the commandments of men</text:span><text:span text:style-name="T3">.</text:span></text:p>
          </table:table-cell>
        </table:table-row>
      </table:table>
      <text:p text:style-name="Standard"/>
      <text:p text:style-name="P2">Our perspective can <text:span text:style-name="T5">easily </text:span>be twisted and wrong because of the lies that the world teaches us. <text:span text:style-name="T6">Sometimes</text:span><text:span text:style-name="T7">, those lies become entrenched in </text:span><text:span text:style-name="T8">our</text:span><text:span text:style-name="T7"> tradition and if we’re not careful they </text:span><text:span text:style-name="T9">creep i</text:span><text:span text:style-name="T7">nto the body of Christ (the Church).</text:span></text:p>
      <text:p text:style-name="P3"/>
      <text:p text:style-name="P4">Be vigilant and continually remember that the world is the enemy of God. <text:span text:style-name="T10">They will continue to pervert God’s ways until the return of the Lord Jesus Christ.</text:span></text:p>
      <text:p text:style-name="P4"/>
      <table:table table:name="Table6" table:style-name="Table6">
        <table:table-column table:style-name="Table6.A"/>
        <table:table-row>
          <table:table-cell table:style-name="Table6.A1" office:value-type="string">
            <text:p text:style-name="Table_20_Contents"><text:span text:style-name="T2">James 4:4</text:span><text:line-break/>Ye adulterers and adulteresses, know ye not that the friendship of the world is enmity with God? whosoever therefore will be a friend of <text:span text:style-name="T11">the world is the enemy of God</text:span>.</text:p>
          </table:table-cell>
        </table:table-row>
      </table:table>
      <text:p text:style-name="P5"/>
      <text:p text:style-name="Horizontal_20_Line"/>
      <text:p text:style-name="P6"><text:span text:style-name="T12">I</text:span>f we aren’t careful we can then <text:span text:style-name="T13">accept</text:span> <text:span text:style-name="T14">that tradition</text:span> <text:span text:style-name="T13">as truth which then causes</text:span> us to err <text:span text:style-name="T15">in our judgment</text:span>.</text:p>
      <text:p text:style-name="P6"/>
      <text:p text:style-name="P6"><text:span text:style-name="T16">In the following </text:span><text:span text:style-name="T17">example</text:span><text:span text:style-name="T16"> we’re going to look at a </text:span><text:span text:style-name="T18">tradition </text:span><text:span text:style-name="T16">that is </text:span><text:span text:style-name="T19">so </text:span><text:span text:style-name="T16">deeply </text:span><text:span text:style-name="T20">embedded</text:span><text:span text:style-name="T16"> </text:span><text:span text:style-name="T19">in</text:span><text:span text:style-name="T21">to</text:span><text:span text:style-name="T19"> human culture and nearly every nation on the planet that you might even be offended, hurt, or upset </text:span><text:span text:style-name="T22">to learn </text:span><text:span text:style-name="T19">that we’ve </text:span><text:span text:style-name="T23">so easily </text:span><text:span text:style-name="T19">accepted </text:span><text:span text:style-name="T24">this</text:span><text:span text:style-name="T19"> lie hook, line, and sinker for </text:span><text:span text:style-name="T25">thousands</text:span><text:span text:style-name="T19"> of years. </text:span><text:span text:style-name="T26">P</text:span><text:span text:style-name="T22">repare yourself for that.</text:span></text:p>
      <text:p text:style-name="P7"/>
      <text:p text:style-name="P7">Take the following scenario:</text:p>
      <text:p text:style-name="P8"/>
      <text:p text:style-name="P9">A virgin, “unmarried in the traditional sense”, <text:span text:style-name="T27">man and woman </text:span><text:span text:style-name="T28">have</text:span> <text:span text:style-name="T29">intercourse</text:span> <text:span text:style-name="T28">together</text:span>. <text:span text:style-name="T28">Most people </text:span><text:span text:style-name="T30">would </text:span><text:span text:style-name="T31">condemn them and say</text:span><text:span text:style-name="T28"> “you need to get married” and most </text:span><text:span text:style-name="T32">other </text:span><text:span text:style-name="T28">people would agree with them. </text:span><text:span text:style-name="T33">Unfortunately </text:span><text:span text:style-name="T34">for those </text:span><text:span text:style-name="T35">deceived </text:span><text:span text:style-name="T34">people</text:span><text:span text:style-name="T33">: </text:span><text:span text:style-name="T35">the couple is</text:span><text:span text:style-name="T33"> already married. </text:span><text:span text:style-name="T36">Therefore,</text:span><text:span text:style-name="T37"> those people </text:span><text:span text:style-name="T38">have condemned</text:span><text:span text:style-name="T37"> the </text:span><text:span text:style-name="T36">guiltless</text:span><text:span text:style-name="T37">.</text:span></text:p>
      <text:p text:style-name="P10"/>
      <text:p text:style-name="P11">Seems contradictory right? <text:span text:style-name="T39">They need to get married but they’re already married. That’s because it is. </text:span><text:span text:style-name="T40">In that example there are t</text:span><text:span text:style-name="T39">wo ideals at odds with each other: one is of the world and the other is of God. </text:span><text:span text:style-name="T41">One is wrong and one is right.</text:span><text:span text:style-name="T39"> </text:span><text:span text:style-name="T42">The </text:span><text:span text:style-name="T43">important </text:span><text:span text:style-name="T42">question </text:span><text:span text:style-name="T43">to ask yourself </text:span><text:span text:style-name="T44">is, </text:span><text:span text:style-name="T42">which is which?</text:span></text:p>
      <text:p text:style-name="P11"/>
      <text:p text:style-name="P12">Let’s start with the easy part <text:span text:style-name="T45">that </text:span>we all know because we’ve <text:span text:style-name="T46">all </text:span>been taught the same from birth. <text:span text:style-name="T47">It’s so ingrained in</text:span><text:span text:style-name="T48">to</text:span><text:span text:style-name="T47"> human culture that every nation on the planet seems to have evolved </text:span><text:span text:style-name="T49">their own</text:span><text:span text:style-name="T47"> style of it </text:span><text:span text:style-name="T50">(anything ecumenical should immediately raise a red flag. </text:span><text:span text:style-name="T51">Matthew 10:34</text:span><text:span text:style-name="T50">)</text:span><text:span text:style-name="T47">.</text:span></text:p>
      <text:p text:style-name="P12"/>
      <text:p text:style-name="P13"><text:span text:style-name="T52">So, h</text:span>ow does the world define marriage? <text:span text:style-name="T53">It usually involves a feast, a </text:span><text:span text:style-name="T54">ritual</text:span><text:span text:style-name="T53">, and then some licensed official declares the couple married </text:span><text:span text:style-name="T55">(a wedding </text:span><text:span text:style-name="T56">ceremony</text:span><text:span text:style-name="T55">)</text:span><text:span text:style-name="T53">.</text:span></text:p>
      <text:p text:style-name="P13"/>
      <text:p text:style-name="P13"><text:span text:style-name="T57">Now they’re married right? </text:span><text:span text:style-name="T58">In the eyes of the world? Yes. But, in the eyes of God? </text:span><text:span text:style-name="T59">No</text:span><text:span text:style-name="T58">.</text:span></text:p>
      <text:p text:style-name="P14"/>
      <text:p text:style-name="P15"/>
      <text:p text:style-name="P15"/>
      <text:p text:style-name="P15"/>
      <text:p text:style-name="P15"/>
      <text:p text:style-name="P15"/>
      <text:p text:style-name="P15"/>
      <text:p text:style-name="P15"/>
      <text:p text:style-name="P15"/>
      <table:table table:name="Table2" table:style-name="Table2">
        <table:table-column table:style-name="Table2.A"/>
        <text:soft-page-break/>
        <table:table-row>
          <table:table-cell table:style-name="Table2.A1" office:value-type="string">
            <text:p text:style-name="Table_20_Contents"><text:span text:style-name="T2">Genesis 2:21-25</text:span><text:line-break/><text:span text:style-name="T60">21</text:span> And the <text:span text:style-name="T3">LORD God</text:span> caused a deep sleep to fall upon <text:span text:style-name="T61">Adam</text:span>, and <text:span text:style-name="T61">he</text:span> slept: and <text:span text:style-name="T3">he</text:span> took one of <text:span text:style-name="T61">his</text:span> ribs, and closed up <text:span text:style-name="T61">the flesh</text:span> instead thereof;<text:line-break/><text:span text:style-name="T60">22</text:span> And <text:span text:style-name="T62">the rib</text:span>, which the <text:span text:style-name="T3">LORD God</text:span> had taken from <text:span text:style-name="T61">man</text:span>, made <text:span text:style-name="T3">he</text:span> a <text:span text:style-name="T62">woman</text:span>, and brought <text:span text:style-name="T62">her</text:span> unto the <text:span text:style-name="T61">man</text:span>.<text:line-break/><text:span text:style-name="T60">23</text:span> And <text:span text:style-name="T61">Adam</text:span> said, <text:span text:style-name="T62">This</text:span> is now <text:span text:style-name="T62">bone</text:span> of <text:span text:style-name="T61">my</text:span> bones, and <text:span text:style-name="T62">flesh</text:span> of <text:span text:style-name="T61">my</text:span> flesh: <text:span text:style-name="T62">she</text:span> shall be called <text:span text:style-name="T62">Woman</text:span>, because <text:span text:style-name="T62">she</text:span> was taken out of <text:span text:style-name="T61">Man</text:span>.<text:line-break/><text:span text:style-name="T60">24</text:span> Therefore <text:span text:style-name="T63">shall</text:span> a <text:span text:style-name="T61">man</text:span> leave <text:span text:style-name="T61">his</text:span> father and <text:span text:style-name="T61">his</text:span> mother, and <text:span text:style-name="T63">shall</text:span> <text:span text:style-name="T11">cleave</text:span> unto <text:span text:style-name="T61">his</text:span> <text:span text:style-name="T64">wife</text:span>: and they <text:span text:style-name="T63">shall</text:span> be <text:span text:style-name="T11">one flesh</text:span>.<text:line-break/><text:span text:style-name="T60">25</text:span> And they were both naked, the <text:span text:style-name="T61">man</text:span> and <text:span text:style-name="T61">his</text:span> <text:span text:style-name="T64">wife</text:span>, and were not ashamed.</text:p>
          </table:table-cell>
        </table:table-row>
      </table:table>
      <text:p text:style-name="P15"/>
      <text:p text:style-name="P16"><text:span text:style-name="T65">D</text:span>o take note that v<text:span text:style-name="T2">24</text:span> is <text:span text:style-name="T66">all</text:span> <text:span text:style-name="T67">future</text:span> tense <text:span text:style-name="T65">(it’s not chronologically speaking about Adam </text:span><text:span text:style-name="T68">&amp; Eve </text:span><text:span text:style-name="T69">but instead it speaks towards </text:span><text:span text:style-name="T70">all</text:span><text:span text:style-name="T69"> men</text:span><text:span text:style-name="T65">) </text:span>and it’s a three step process:</text:p>
      <text:p text:style-name="P16"/>
      <text:list xml:id="list167094775" text:style-name="L1">
        <text:list-item>
          <text:p text:style-name="P17">The man leaves his father and his mother.</text:p>
        </text:list-item>
        <text:list-item>
          <text:p text:style-name="P18">He cleaves unto his wife.</text:p>
        </text:list-item>
      </text:list>
      <text:list text:style-name="L2">
        <text:list-item>
          <text:list>
            <text:list-item>
              <text:p text:style-name="P19"><text:span text:style-name="T71">Cleave: </text:span><text:span text:style-name="T72">to take, keep, stay close to, join together, follow closely, stick together. </text:span><text:span text:style-name="T71">T</text:span><text:span text:style-name="T73">he word “cleave”</text:span><text:span text:style-name="T72"> </text:span><text:span text:style-name="T74">does not</text:span><text:span text:style-name="T72"> </text:span><text:span text:style-name="T75">communicate</text:span><text:span text:style-name="T72"> </text:span><text:span text:style-name="T76">intercourse </text:span><text:span text:style-name="T77">it is simply a close partnership.</text:span></text:p>
            </text:list-item>
          </text:list>
        </text:list-item>
      </text:list>
      <text:list text:continue-list="list167094775" text:style-name="L1">
        <text:list-item>
          <text:p text:style-name="P20">The man and his wife become one flesh<text:tab/>.</text:p>
        </text:list-item>
      </text:list>
      <text:list text:style-name="L3">
        <text:list-item>
          <text:list>
            <text:list-item>
              <text:p text:style-name="P21"><text:span text:style-name="T78">T</text:span><text:span text:style-name="T79">his is </text:span><text:span text:style-name="T80">the </text:span><text:span text:style-name="T79">physical joining, what we would call </text:span><text:span text:style-name="T81">intercourse, mating, copulation, or </text:span><text:span text:style-name="T79">sex.</text:span></text:p>
            </text:list-item>
          </text:list>
        </text:list-item>
      </text:list>
      <text:p text:style-name="P15"/>
      <text:p text:style-name="P22">v<text:span text:style-name="T2">25</text:span> is where things get interesting. It’s the first time that Eve is called Adam’s wife in the <text:span text:style-name="T67">past</text:span> tense. <text:span text:style-name="T82">That means at that point </text:span><text:span text:style-name="T83">in time </text:span><text:span text:style-name="T82">God considered Adam and Eve </text:span><text:span text:style-name="T84">to be </text:span><text:span text:style-name="T82">husband and wife </text:span><text:span text:style-name="T85">(married)</text:span><text:span text:style-name="T82">. No </text:span><text:span text:style-name="T86">ritual</text:span><text:span text:style-name="T82">, no papers, and </text:span><text:span text:style-name="T87">also</text:span><text:span text:style-name="T82"> no </text:span><text:span text:style-name="T88">intercourse </text:span><text:span text:style-name="T89">that we know of from this context</text:span><text:span text:style-name="T90">*</text:span><text:span text:style-name="T82">.</text:span></text:p>
      <text:p text:style-name="P23"/>
      <text:p text:style-name="P24">The phrase “<text:span text:style-name="T91">one flesh</text:span>” appears seven times in six verses in the Bible: <text:span text:style-name="T2">Genesis 2:24</text:span>, <text:span text:style-name="T2">Matthew 19:5,6</text:span>, <text:span text:style-name="T2">Mark 10:8</text:span>, <text:span text:style-name="T2">1 Corinthians 6:16</text:span>, <text:span text:style-name="T2">Ephesians 5:31</text:span>. <text:span text:style-name="T92">E</text:span><text:span text:style-name="T93">very one of them contributes something to the idea of what it means to be “</text:span><text:span text:style-name="T94">one flesh</text:span><text:span text:style-name="T93">”.</text:span></text:p>
      <text:p text:style-name="P24"/>
      <table:table table:name="Table3" table:style-name="Table3">
        <table:table-column table:style-name="Table3.A"/>
        <table:table-column table:style-name="Table3.B"/>
        <table:table-row table:style-name="Table3.1">
          <table:table-cell table:style-name="Table3.A1" office:value-type="string">
            <text:p text:style-name="Table_20_Contents"><text:span text:style-name="T2">Genesis 2:24</text:span><text:line-break/>Therefore shall a man leave his father and his mother, and shall cleave unto his wife: <text:span text:style-name="T95">and they shall be </text:span><text:span text:style-name="T96">one flesh</text:span><text:span text:style-name="T95">.</text:span></text:p>
          </table:table-cell>
          <table:table-cell table:style-name="Table3.B1" office:value-type="string">
            <text:p text:style-name="P25">When a man and woman stick close together they (future tense) shall be one flesh.</text:p>
            <text:p text:style-name="P25"/>
            <text:p text:style-name="P26">What naturally happens when a man and a woman stick <text:span text:style-name="T97">very </text:span>close to each other for any length of time? <text:span text:style-name="T98">Whether they actually perform the act of intercourse together or not they certainly at least think about it. </text:span><text:span text:style-name="T99">That</text:span><text:span text:style-name="T100"> “</text:span><text:span text:style-name="T99">natural attraction” </text:span><text:span text:style-name="T100">is exactly why men and woman feel the need to be “separated” from each other.</text:span></text:p>
          </table:table-cell>
        </table:table-row>
        <table:table-row table:style-name="Table3.1">
          <table:table-cell table:style-name="Table3.A2" office:value-type="string">
            <text:p text:style-name="Table_20_Contents"><text:span text:style-name="T2">Matthew 19:3-6</text:span><text:line-break/><text:span text:style-name="T60">3</text:span> The Pharisees also came unto him, tempting him, and saying unto him, Is it lawful for a man to put away his wife for every cause?<text:line-break/><text:span text:style-name="T60">4</text:span> And he answered and said unto them, <text:span text:style-name="T3">Have ye not read, that he which made them at the beginning made them male and female,</text:span><text:line-break/><text:span text:style-name="T60">5</text:span> <text:span text:style-name="T3">And said, For this cause shall a man leave father and mother, and shall cleave to his wife: and they twain shall be </text:span><text:span text:style-name="T101">one flesh</text:span><text:span text:style-name="T3">?</text:span><text:line-break/><text:span text:style-name="T60">6</text:span> <text:span text:style-name="T3">Wherefore they are no more twain, but </text:span><text:span text:style-name="T101">one flesh</text:span><text:span text:style-name="T3">. </text:span><text:span text:style-name="T102">What therefore God hath joined together</text:span><text:span text:style-name="T3">, let not man put asunder.</text:span></text:p>
          </table:table-cell>
          <table:table-cell table:style-name="Table3.B2" office:value-type="string">
            <text:p text:style-name="P27">God does the joining <text:span text:style-name="T103">(</text:span><text:span text:style-name="T104">the context</text:span><text:span text:style-name="T103"> is physical).</text:span></text:p>
          </table:table-cell>
        </table:table-row>
        <text:soft-page-break/>
        <table:table-row table:style-name="Table3.1">
          <table:table-cell table:style-name="Table3.A3" office:value-type="string">
            <text:p text:style-name="Table_20_Contents"><text:span text:style-name="T2">Mark 10:2-9</text:span><text:line-break/><text:span text:style-name="T60">2</text:span> And the Pharisees came to him, and asked him, Is it lawful for a man to put away his wife? tempting him.<text:line-break/><text:span text:style-name="T60">3</text:span> And he answered and said unto them, <text:span text:style-name="T3">What did Moses command you?</text:span><text:line-break/><text:span text:style-name="T60">4</text:span> And they said, Moses suffered to write a bill of divorcement, and to put her away.<text:line-break/><text:span text:style-name="T60">5</text:span> And Jesus answered and said unto them, <text:span text:style-name="T3">For the hardness of your heart he wrote you this precept.</text:span><text:line-break/><text:span text:style-name="T60">6</text:span> <text:span text:style-name="T3">But from the beginning of the creation God made them male and female.</text:span><text:line-break/><text:span text:style-name="T60">7</text:span> <text:span text:style-name="T3">For this cause shall a man leave his father and mother, and cleave to his wife;</text:span><text:line-break/><text:span text:style-name="T60">8</text:span> <text:span text:style-name="T3">And they twain shall be </text:span><text:span text:style-name="T101">one flesh</text:span><text:span text:style-name="T3">: so then they are no more twain, but </text:span><text:span text:style-name="T101">one flesh</text:span><text:span text:style-name="T3">.</text:span><text:line-break/><text:span text:style-name="T60">9</text:span> <text:span text:style-name="T102">What therefore God hath joined together</text:span><text:span text:style-name="T3">, let not man put asunder.</text:span></text:p>
          </table:table-cell>
          <table:table-cell table:style-name="Table3.B2" office:value-type="string">
            <text:p text:style-name="P28">Something happens when a man and a woman stick close to each other that causes them to go from “two fleshes” (twain) to “one flesh”.</text:p>
            <text:p text:style-name="P28"/>
            <text:p text:style-name="P29">God does the joining <text:span text:style-name="T103">(</text:span><text:span text:style-name="T104">the context</text:span><text:span text:style-name="T103"> is physical).</text:span></text:p>
          </table:table-cell>
        </table:table-row>
        <table:table-row table:style-name="Table3.1">
          <table:table-cell table:style-name="Table3.A3" office:value-type="string">
            <text:p text:style-name="Table_20_Contents"><text:span text:style-name="T2">1 Corinthians 6:15-1</text:span><text:span text:style-name="T105">6</text:span><text:line-break/><text:span text:style-name="T60">15</text:span> Know ye not that your bodies are the members of Christ? shall I then take the members of Christ, and make them the members of an harlot? God forbid.<text:line-break/><text:span text:style-name="T60">16</text:span> What? know ye not that <text:span text:style-name="T95">he which is joined to an harlot is one body?</text:span> for two, saith he, shall be <text:span text:style-name="T67">one flesh</text:span>.</text:p>
          </table:table-cell>
          <table:table-cell table:style-name="Table3.B2" office:value-type="string">
            <text:p text:style-name="P30"><text:span text:style-name="T90">*</text:span><text:span text:style-name="T106">Two bodies joining together is the same as becoming “one flesh”. </text:span><text:span text:style-name="T107">This </text:span><text:span text:style-name="T108">also </text:span><text:span text:style-name="T109">necessarily </text:span><text:span text:style-name="T110">tells us</text:span><text:span text:style-name="T109"> </text:span><text:span text:style-name="T107">that </text:span><text:span text:style-name="T111">chronologically </text:span><text:span text:style-name="T112">Genesis 4:1a</text:span><text:span text:style-name="T111"> occurred before </text:span><text:span text:style-name="T113">Genesis 2:25</text:span>.</text:p>
            <text:p text:style-name="P31"/>
            <text:p text:style-name="P32"><text:span text:style-name="T114">This is the most explicit verse that tells us that</text:span> “becoming one flesh” is the same as “<text:span text:style-name="T115">joining together” which is the same as </text:span>“<text:span text:style-name="T76">intercourse/mating/copulating/sex</text:span>”.</text:p>
          </table:table-cell>
        </table:table-row>
        <table:table-row table:style-name="Table3.1">
          <table:table-cell table:style-name="Table3.A5" office:value-type="string">
            <text:p text:style-name="P33"><text:span text:style-name="T2">Ephesians 5:28-3</text:span><text:span text:style-name="T116">3</text:span><text:line-break/><text:span text:style-name="T60">28</text:span> So ought men to love their wives as their own bodies. <text:span text:style-name="T95">He that loveth his wife loveth himself</text:span>.<text:line-break/>29 For no man ever yet hated his own flesh; but nourisheth and cherisheth it, even as the Lord the church:<text:line-break/><text:span text:style-name="T60">30</text:span> For we are members of his body, of his flesh, and of his bones.<text:line-break/><text:span text:style-name="T60">31</text:span> For this cause shall a man leave his father and mother, and shall be joined unto his wife, and they two shall be <text:span text:style-name="T67">one flesh</text:span>.<text:line-break/><text:span text:style-name="T60">32</text:span> This is a great mystery: but I speak concerning Christ and the church.<text:line-break/><text:span text:style-name="T60">33</text:span> Nevertheless let every one of you in particular so <text:span text:style-name="T95">love his wife even as himself</text:span>; and the wife <text:span text:style-name="T95">see that she reverence her husband</text:span>.</text:p>
          </table:table-cell>
          <table:table-cell table:style-name="Table3.B2" office:value-type="string">
            <text:p text:style-name="P34">Note that the context is husbands and wives (<text:span text:style-name="T117">they’re already married</text:span>).</text:p>
            <text:p text:style-name="P34"/>
            <text:p text:style-name="P35">A man should love, cherish, and nourish his wife as if it were is own flesh because <text:span text:style-name="T66">they are one flesh</text:span>.</text:p>
            <text:p text:style-name="P35"/>
            <text:p text:style-name="P35"/>
          </table:table-cell>
        </table:table-row>
      </table:table>
      <text:p text:style-name="P36"/>
      <text:p text:style-name="Standard"><text:span text:style-name="T118">And that’s all we really need to look at because t</text:span><text:span text:style-name="T119">ry as we might we will never find in scripture </text:span><text:span text:style-name="T118">God </text:span><text:span text:style-name="T120">acknowledging</text:span><text:span text:style-name="T118"> </text:span><text:span text:style-name="T119">a </text:span><text:span text:style-name="T121">couple as husband and wife based on a </text:span><text:span text:style-name="T119">feast, ceremony/</text:span><text:span text:style-name="T121">ritual</text:span><text:span text:style-name="T119">, and/or legal document.</text:span></text:p>
      <text:p text:style-name="Standard"/>
      <text:p text:style-name="P37">Instead, until we get to the new testament</text:p>
      <text:p text:style-name="P38"/>
      <text:p text:style-name="P38"/>
      <text:p text:style-name="P38"/>
      <text:p text:style-name="P39"><text:soft-page-break/>Isaac &amp; Rebekah</text:p>
      <text:p text:style-name="P40"/>
      <table:table table:name="Table5" table:style-name="Table5">
        <table:table-column table:style-name="Table5.A"/>
        <table:table-row>
          <table:table-cell table:style-name="Table5.A1" office:value-type="string">
            <text:p text:style-name="P41"><text:span text:style-name="T2">Genesis 24:51-67</text:span><text:line-break/><text:span text:style-name="T60">51</text:span> Behold, Rebekah is before thee, take her, and go, and let her be thy master's son's wife, as the LORD hath spoken.<text:line-break/>…</text:p>
            <text:p text:style-name="P41"><text:span text:style-name="T60">62</text:span> And Isaac came from the way of the well Lahairoi; for he dwelt in the south country.</text:p>
            <text:p text:style-name="P41">...<text:line-break/><text:span text:style-name="T60">67</text:span> And Isaac brought her into his mother Sarah's tent, and took Rebekah, and she became his wife; and he loved her: and Isaac was comforted after his mother's death.</text:p>
          </table:table-cell>
        </table:table-row>
      </table:table>
      <text:p text:style-name="P40"/>
      <text:p text:style-name="P42">If we go back one chapter we see that Abraham was dwelling in Hebron (<text:span text:style-name="T2">Genesis 23:2</text:span>). <text:span text:style-name="T122">As far as we know, Abraham does not move from that location and is buried there in the same cave as his wife Sarah (</text:span><text:span text:style-name="T123">Genesis 25:9,10</text:span><text:span text:style-name="T122">). </text:span><text:span text:style-name="T124">On the other hand, his son Isaac lived in the “south country” near to the well Lahai-roi.</text:span></text:p>
      <text:p text:style-name="P43"/>
      <table:table table:name="Table7" table:style-name="Table7">
        <table:table-column table:style-name="Table7.A"/>
        <table:table-row>
          <table:table-cell table:style-name="Table7.A1" office:value-type="string">
            <text:p text:style-name="Table_20_Contents"><text:span text:style-name="T2">Genesis 16:14</text:span><text:line-break/>Wherefore the well was called <text:span text:style-name="T95">Beer-lahai-roi</text:span>; behold, it is between Kadesh and Bered.</text:p>
          </table:table-cell>
        </table:table-row>
        <table:table-row>
          <table:table-cell table:style-name="Table7.A2" office:value-type="string">
            <text:p text:style-name="Table_20_Contents"><text:span text:style-name="T2">Genesis 24:62</text:span><text:line-break/>And Isaac came from the way of the <text:span text:style-name="T95">well Lahai-roi</text:span>; for he dwelt in the south country.</text:p>
          </table:table-cell>
        </table:table-row>
        <table:table-row>
          <table:table-cell table:style-name="Table7.A2" office:value-type="string">
            <text:p text:style-name="Table_20_Contents"><text:span text:style-name="T2">Genesis 25:11</text:span><text:line-break/>And it came to pass after the death of Abraham, that God blessed his son Isaac; and Isaac dwelt by the <text:span text:style-name="T95">well Lahai-roi</text:span>.</text:p>
          </table:table-cell>
        </table:table-row>
      </table:table>
      <text:p text:style-name="P43"/>
      <text:p text:style-name="P43">In Hebrew “beer” means “well” or “pit”. In <text:span text:style-name="T2">Genesis 24:62</text:span> and <text:span text:style-name="T2">25:11</text:span> that word is provided for us in English and so the prefix “beer” is not needed <text:span text:style-name="T125">and wouldn’t make sense to include because “the well Beer-Lahai-Roi” would read “the well well Lahai-Roi”.</text:span></text:p>
      <text:p text:style-name="P43"/>
      <text:p text:style-name="P44">So why do we need to know all that? <text:span text:style-name="T2">Genesis 16:14</text:span> tells us that that same well is “between Kadesh and Bered”. And that tells us that the “south country” that Isaac lived in was far to the southwest of Beer-<text:span text:style-name="T126">S</text:span>heba. <text:span text:style-name="T127">Isaac lived more than 25 miles away from his father Abraham, likely closer to 80 miles to the southwest but we can’t know for sure </text:span><text:span text:style-name="T128">because t</text:span><text:span text:style-name="T127">he exact location of the </text:span><text:span text:style-name="T128">well </text:span><text:span text:style-name="T127">Lahai-Roi is debatable.</text:span></text:p>
      <text:p text:style-name="P44"/>
      <text:p text:style-name="P45"><draw:frame draw:style-name="fr1" draw:name="Image1" text:anchor-type="as-char" svg:width="5.0472in" svg:height="3.8827in" draw:z-index="0"><draw:image xlink:href="Pictures/1000000100000510000003E5D39D3B72.png" xlink:type="simple" xlink:show="embed" xlink:actuate="onLoad" draw:mime-type="image/png"/></draw:frame></text:p>
      <text:p text:style-name="P46"><text:soft-page-break/>Now that we’ve gathered all that information from the Bible on Isaac and Rebekah let’s go back to the three step process found in <text:span text:style-name="T2">Genesis 2:24</text:span>.</text:p>
      <text:p text:style-name="P46"/>
      <table:table table:name="Table8" table:style-name="Table8">
        <table:table-column table:style-name="Table8.A"/>
        <table:table-row>
          <table:table-cell table:style-name="Table8.A1" office:value-type="string">
            <text:p text:style-name="P47">Gene<text:span text:style-name="T129">sis 2:24</text:span></text:p>
            <text:p text:style-name="P48"><text:span text:style-name="T129">Step 1: </text:span>Therefore shall a man leave his father and his mother,</text:p>
            <text:p text:style-name="P48"><text:span text:style-name="T129">Step 2: </text:span>and shall cleave unto his wife:</text:p>
            <text:p text:style-name="P48"><text:span text:style-name="T129">Step 3: </text:span>and they shall be one flesh.</text:p>
          </table:table-cell>
        </table:table-row>
      </table:table>
      <text:p text:style-name="P46"/>
      <table:table table:name="Table9" table:style-name="Table9">
        <table:table-column table:style-name="Table9.A"/>
        <table:table-row>
          <table:table-cell table:style-name="Table9.A1" office:value-type="string">
            <text:p text:style-name="P49"><text:span text:style-name="T2">Genesis 24:67</text:span><text:line-break/>And Isaac brought her into his mother Sarah's tent, and took Rebekah, and she became his wife; and he loved her: and Isaac was comforted after his mother's death.</text:p>
          </table:table-cell>
        </table:table-row>
      </table:table>
      <text:p text:style-name="P46"/>
      <text:p text:style-name="P46"/>
      <text:list xml:id="list188057184" text:style-name="L4">
        <text:list-item>
          <text:p text:style-name="P50">Isaac leaves his father and his mother and dwells in the south country.</text:p>
        </text:list-item>
        <text:list-item>
          <text:p text:style-name="P51">Isaac cleaves to his wife Rebekah.</text:p>
        </text:list-item>
      </text:list>
      <text:list text:style-name="L5">
        <text:list-item>
          <text:list>
            <text:list-item>
              <text:p text:style-name="P52">“And Isaac brought her into his mother Sarah's tent”</text:p>
            </text:list-item>
          </text:list>
        </text:list-item>
      </text:list>
      <text:list xml:id="list123016698802335" text:continue-list="list188057184" text:style-name="L4">
        <text:list-item>
          <text:p text:style-name="P53">Isaac &amp; Rebekah have intercourse.</text:p>
        </text:list-item>
      </text:list>
      <text:list text:style-name="L6">
        <text:list-item>
          <text:list>
            <text:list-item>
              <text:p text:style-name="P54">“and took Rebekah”</text:p>
            </text:list-item>
          </text:list>
        </text:list-item>
      </text:list>
      <text:list text:continue-list="list123016698802335" text:style-name="L4">
        <text:list-item>
          <text:p text:style-name="P55">Rebekah is now Isaac’s wife and they are married.</text:p>
        </text:list-item>
      </text:list>
      <text:list text:style-name="L7">
        <text:list-item>
          <text:list>
            <text:list-item>
              <text:p text:style-name="P56">“and she became his wife”</text:p>
            </text:list-item>
          </text:list>
        </text:list-item>
      </text:list>
      <text:p text:style-name="P38"/>
      <text:p text:style-name="P38"/>
      <text:p text:style-name="P57">And now that we have gathered the information we need from scripture we can look at the two ideals that clash with each other in the first example side by side:</text:p>
      <text:p text:style-name="P57"/>
      <table:table table:name="Table4" table:style-name="Table4">
        <table:table-column table:style-name="Table4.A"/>
        <table:table-column table:style-name="Table4.B"/>
        <table:table-row>
          <table:table-cell table:style-name="Table4.A1" table:number-columns-spanned="2" office:value-type="string">
            <text:p text:style-name="P58">Marriage</text:p>
          </table:table-cell>
          <table:covered-table-cell/>
        </table:table-row>
        <table:table-row>
          <table:table-cell table:style-name="Table4.A2" office:value-type="string">
            <text:p text:style-name="P59">God’s eyes</text:p>
          </table:table-cell>
          <table:table-cell table:style-name="Table4.B2" office:value-type="string">
            <text:p text:style-name="P59">Man’s eyes</text:p>
          </table:table-cell>
        </table:table-row>
        <table:table-row>
          <table:table-cell table:style-name="Table4.A2" office:value-type="string">
            <text:p text:style-name="P60">One flesh, coming together, joining together, knowing one another, intercourse, copulation, mating, sex</text:p>
          </table:table-cell>
          <table:table-cell table:style-name="Table4.B2" office:value-type="string">
            <text:p text:style-name="P60">A feast and/or a ceremony and/or a <text:span text:style-name="T130">ritual and/or a </text:span>legal document</text:p>
          </table:table-cell>
        </table:table-row>
      </table:table>
      <text:p text:style-name="P61"/>
      <text:p text:style-name="P62"><text:span text:style-name="T131">W</text:span>hen making any judgment <text:span text:style-name="T132">(</text:span><text:span text:style-name="T133">John 7:24</text:span><text:span text:style-name="T132">)</text:span>, which do you think is right according to God?</text:p>
      <text:p text:style-name="P63"/>
      <text:p text:style-name="P64">The<text:span text:style-name="T131">refore, the</text:span> next time we look at an “unmarried <text:span text:style-name="T134">in the traditional sense</text:span>” couple <text:span text:style-name="T135">that have had</text:span> intercourse together<text:span text:style-name="T135"> </text:span><text:span text:style-name="T136">we should </text:span>consider <text:span text:style-name="T137">carefully</text:span> God’s perspective first: t<text:span text:style-name="T137">hey’re already married </text:span><text:span text:style-name="T138">(whether that marriage was fornication or adultery is a different matter)</text:span><text:span text:style-name="T137">. </text:span><text:span text:style-name="T139">The feasts, the ceremonies, the legal documents: none of that will count for anything in </text:span><text:span text:style-name="T140">the</text:span><text:span text:style-name="T139"> judgment </text:span><text:span text:style-name="T141">(</text:span><text:span text:style-name="T142">Proverbs 29:26</text:span><text:span text:style-name="T141">, </text:span><text:span text:style-name="T142">Hebrew 9:27</text:span><text:span text:style-name="T141">). </text:span><text:span text:style-name="T143">What will matter is </text:span><text:span text:style-name="T144">condemning innocent peo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Gabriela" svg:font-family="Gabriel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08:36:45.122484100</meta:creation-date>
    <dc:title>What is marriage?</dc:title>
    <meta:editing-duration>PT7H15M59S</meta:editing-duration>
    <meta:editing-cycles>325</meta:editing-cycles>
    <meta:generator>LibreOffice/26.2.4.2$Linux_X86_64 LibreOffice_project/64a984c51f4702dbd3710b13428c673a2f1292e7</meta:generator>
    <dc:date>2026-07-11T12:30:15.295417520</dc:date>
    <meta:print-date>2026-04-22T13:16:23.916772600</meta:print-date>
    <meta:printed-by>PDF files</meta:printed-by>
    <meta:document-statistic meta:table-count="9" meta:image-count="1" meta:object-count="0" meta:page-count="5" meta:paragraph-count="70" meta:word-count="1991" meta:character-count="10843" meta:non-whitespace-character-count="8933"/>
    <meta:template xlink:type="simple" xlink:actuate="onRequest" xlink:title="default" xlink:href="../../../../AppData/Roaming/LibreOffice/4/user/template/default1.ott" meta:date="2026-04-22T08:36:43.273266400"/>
  </office:meta>
</office:document-meta>
</file>