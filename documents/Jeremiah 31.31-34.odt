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8.2in" table:align="margins"/>
    </style:style>
    <style:style style:name="Table1.A" style:family="table-column">
      <style:table-column-properties style:column-width="4.1in" style:rel-column-width="32767*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B1" style:family="table-cell">
      <style:table-cell-properties fo:padding="0.0382in" fo:border="0.5pt solid #000000"/>
    </style:style>
    <style:style style:name="T1" style:family="text">
      <style:text-properties style:text-position="33% 80%"/>
    </style:style>
    <style:style style:name="T2" style:family="text">
      <style:text-properties fo:font-style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 table:number-columns-repeated="2"/>
        <table:table-row>
          <table:table-cell table:style-name="Table1.A1" office:value-type="string">
            <text:p text:style-name="Table_20_Contents">Jeremiah 31:31-34<text:line-break/><text:span text:style-name="T1">31</text:span> Behold, the days come, saith the LORD, that I will make a new covenant with the house of Israel, and with the house of Judah: <text:line-break/><text:span text:style-name="T1">32</text:span> Not according to the covenant that I made with their fathers in the day <text:span text:style-name="T2">that</text:span> I took them by the hand to bring them out of the land of Egypt; which my covenant they brake, although I was an husband unto them, saith the LORD: <text:line-break/><text:span text:style-name="T1">33</text:span> But this <text:span text:style-name="T2">shall be</text:span> the covenant that I will make with the house of Israel; After those days, saith the LORD, I will put my law in their inward parts, and write it in their hearts; and will be their God, and they shall be my people. <text:line-break/><text:span text:style-name="T1">34</text:span> And they shall teach no more every man his neighbour, and every man his brother, saying, Know the LORD: for they shall all know me, from the least of them unto the greatest of them, saith the LORD: for I will forgive their iniquity, and I will remember their sin no more.</text:p>
          </table:table-cell>
          <table:table-cell table:style-name="Table1.B1" office:value-type="string">
            <text:p text:style-name="Table_20_Contents">Hebrews 8:8-12<text:line-break/><text:span text:style-name="T1">8</text:span> For finding fault with them, he saith, Behold, the days come, saith the Lord, when I will make a new covenant with the house of Israel and with the house of Judah: <text:line-break/><text:span text:style-name="T1">9</text:span> Not according to the covenant that I made with their fathers in the day when I took them by the hand to lead them out of the land of Egypt; because they continued not in my covenant, and I regarded them not, saith the Lord. <text:line-break/><text:span text:style-name="T1">10</text:span> For this <text:span text:style-name="T2">is</text:span> the covenant that I will make with the house of Israel after those days, saith the Lord; I will put my laws into their mind, and write them in their hearts: and I will be to them a God, and they shall be to me a people: <text:line-break/><text:span text:style-name="T1">11</text:span> And they shall not teach every man his neighbour, and every man his brother, saying, Know the Lord: for all shall know me, from the least to the greatest. <text:line-break/><text:span text:style-name="T1">12</text:span> For I will be merciful to their unrighteousness, and their sins and their iniquities will I remember no more.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1" fo:font-family="'Liberation Sans'" style:font-style-name="Regular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15in" fo:margin-bottom="0.15in" fo:margin-left="0.15in" fo:margin-right="0.1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5-12T09:03:24.037000000</meta:creation-date>
    <meta:editing-duration>PT1H20M49S</meta:editing-duration>
    <meta:editing-cycles>2</meta:editing-cycles>
    <meta:generator>LibreOffice/24.8.6.2$Windows_X86_64 LibreOffice_project/6d98ba145e9a8a39fc57bcc76981d1fb1316c60c</meta:generator>
    <dc:title>BibleStudyTemplate</dc:title>
    <dc:date>2025-05-12T10:34:26.439000000</dc:date>
    <meta:document-statistic meta:table-count="1" meta:image-count="0" meta:object-count="0" meta:page-count="1" meta:paragraph-count="2" meta:word-count="357" meta:character-count="1801" meta:non-whitespace-character-count="1439"/>
    <meta:template xlink:type="simple" xlink:actuate="onRequest" xlink:title="BibleStudyTemplate" xlink:href="../../../../AppData/Roaming/LibreOffice/4/user/template/BibleStudyTemplate.ott" meta:date="2025-05-12T09:03:23.138000000"/>
  </office:meta>
</office:document-meta>
</file>