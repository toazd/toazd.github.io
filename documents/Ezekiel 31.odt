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lackChancery" svg:font-family="BlackChancery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.8597in" table:align="margins" style:shadow="#808080 0.0403in 0.0403in" style:writing-mode="lr-tb"/>
    </style:style>
    <style:style style:name="Table5.A" style:family="table-column">
      <style:table-column-properties style:column-width="3.9299in" style:rel-column-width="32767*"/>
    </style:style>
    <style:style style:name="Table5.B" style:family="table-column">
      <style:table-column-properties style:column-width="3.9299in" style:rel-column-width="32768*"/>
    </style:style>
    <style:style style:name="Table5.A1" style:family="table-cell">
      <style:table-cell-properties style:border-line-width="0.0035in 0.0035in 0.0035in" fo:padding="0.0382in" fo:border="0.75pt double #000000"/>
    </style:style>
    <style:style style:name="Table5.A2" style:family="table-cell">
      <style:table-cell-properties style:border-line-width-left="0.0035in 0.0035in 0.0035in" style:border-line-width-right="0.0035in 0.0035in 0.0035in" style:border-line-width-bottom="0.0035in 0.0035in 0.0035in" fo:padding="0.0382in" fo:border-left="0.75pt double #000000" fo:border-right="0.75pt double #000000" fo:border-top="none" fo:border-bottom="0.75pt double #000000"/>
    </style:style>
    <style:style style:name="Table5.A5" style:family="table-cell">
      <style:table-cell-properties style:border-line-width-left="0.0035in 0.0035in 0.0035in" style:border-line-width-bottom="0.0035in 0.0035in 0.0035in" fo:padding="0.0382in" fo:border-left="0.75pt double #000000" fo:border-right="none" fo:border-top="none" fo:border-bottom="0.75pt double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font-name="BlackChancery" fo:font-size="14pt" officeooo:rsid="06bf999e" officeooo:paragraph-rsid="000a838d" style:font-size-asian="14pt" style:font-name-complex="Carlito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BlackChancery" style:text-underline-style="solid" style:text-underline-width="auto" style:text-underline-color="font-color" officeooo:rsid="05adef48" officeooo:paragraph-rsid="000a838d" style:font-name-complex="Carlito"/>
    </style:style>
    <style:style style:name="P3" style:family="paragraph" style:parent-style-name="Table_20_Contents">
      <style:paragraph-properties fo:margin-top="0in" fo:margin-bottom="0in" style:contextual-spacing="false" fo:text-align="left" style:justify-single-word="false" fo:hyphenation-ladder-count="no-limit" fo:hyphenation-keep="auto" loext:hyphenation-keep-type="column" loext:hyphenation-keep-line="false" style:writing-mode="lr-tb"/>
      <style:text-properties fo:color="#127622" loext:opacity="100%" style:font-name="Gabriela Nerd Font" fo:font-size="12pt" fo:language="en" fo:country="US" officeooo:rsid="04553ef7" officeooo:paragraph-rsid="000a838d" style:letter-kerning="false" style:font-name-asian="DejaVu Sans" style:font-size-asian="12pt" style:language-asian="zh" style:country-asian="CN" style:font-name-complex="Carli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Table_20_Contents">
      <style:paragraph-properties style:writing-mode="lr-tb"/>
      <style:text-properties fo:language="en" fo:country="US" officeooo:paragraph-rsid="000a838d" style:language-asian="zh" style:country-asian="CN" style:language-complex="hi" style:country-complex="IN"/>
    </style:style>
    <style:style style:name="P5" style:family="paragraph" style:parent-style-name="Table_20_Contents">
      <style:text-properties officeooo:paragraph-rsid="000a838d"/>
    </style:style>
    <style:style style:name="P6" style:family="paragraph" style:parent-style-name="Standard">
      <style:text-properties fo:color="#127622" loext:opacity="100%" style:font-name="Gabriela Nerd Font" officeooo:rsid="04553ef7" officeooo:paragraph-rsid="000a838d" style:font-name-complex="Carlito"/>
    </style:style>
    <style:style style:name="P7" style:family="paragraph" style:parent-style-name="Standard" style:list-style-name="L1">
      <style:text-properties officeooo:paragraph-rsid="000a838d"/>
    </style:style>
    <style:style style:name="P8" style:family="paragraph" style:parent-style-name="Standard" style:list-style-name="L1">
      <style:text-properties officeooo:rsid="06d6191a" officeooo:paragraph-rsid="000a838d"/>
    </style:style>
    <style:style style:name="P9" style:family="paragraph" style:parent-style-name="Standard" style:list-style-name="L1">
      <style:text-properties officeooo:rsid="06bf1ff9" officeooo:paragraph-rsid="000a838d"/>
    </style:style>
    <style:style style:name="T1" style:family="text">
      <style:text-properties officeooo:rsid="06dc93dc"/>
    </style:style>
    <style:style style:name="T2" style:family="text">
      <style:text-properties officeooo:rsid="06d8a002"/>
    </style:style>
    <style:style style:name="T3" style:family="text">
      <style:text-properties fo:background-color="#afd095" loext:char-shading-value="0"/>
    </style:style>
    <style:style style:name="T4" style:family="text">
      <style:text-properties fo:background-color="#fff5ce" loext:char-shading-value="0"/>
    </style:style>
    <style:style style:name="T5" style:family="text">
      <style:text-properties fo:background-color="#ffbf00" loext:char-shading-value="0"/>
    </style:style>
    <style:style style:name="T6" style:family="text">
      <style:text-properties fo:color="#127622" loext:opacity="100%" style:font-name="Gabriela Nerd Font" fo:font-size="12pt" fo:language="en" fo:country="US" officeooo:rsid="04553ef7" style:letter-kerning="false" style:font-name-asian="DejaVu Sans" style:font-size-asian="12pt" style:language-asian="zh" style:country-asian="CN" style:font-name-complex="Carlito" style:font-size-complex="12pt" style:language-complex="hi" style:country-complex="IN"/>
    </style:style>
    <style:style style:name="T7" style:family="text">
      <style:text-properties style:use-window-font-color="true" loext:opacity="0%" style:text-position="super 58%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fo:background-color="#afd095" loext:char-shading-value="0"/>
    </style:style>
    <style:style style:name="T10" style:family="text">
      <style:text-properties fo:color="#ff0000" loext:opacity="100%" fo:background-color="#fff5ce" loext:char-shading-value="0"/>
    </style:style>
    <style:style style:name="T11" style:family="text">
      <style:text-properties fo:color="#ff0000" loext:opacity="100%" fo:font-style="italic"/>
    </style:style>
    <style:style style:name="T12" style:family="text">
      <style:text-properties fo:color="#ff0000" loext:opacity="100%" fo:background-color="#ffd7d7" loext:char-shading-value="0"/>
    </style:style>
    <style:style style:name="T13" style:family="text">
      <style:text-properties fo:color="#ff0000" loext:opacity="100%" fo:font-style="italic" fo:background-color="#ffd7d7" loext:char-shading-value="0"/>
    </style:style>
    <style:style style:name="T14" style:family="text">
      <style:text-properties officeooo:rsid="06da9cfe"/>
    </style:style>
    <style:style style:name="T15" style:family="text">
      <style:text-properties style:text-position="super 58%" officeooo:rsid="06da9cfe"/>
    </style:style>
    <style:style style:name="T16" style:family="text">
      <style:text-properties fo:background-color="#ffd7d7" loext:char-shading-value="0"/>
    </style:style>
    <style:style style:name="T17" style:family="text">
      <style:text-properties style:text-position="super 58%"/>
    </style:style>
    <style:style style:name="T18" style:family="text">
      <style:text-properties fo:color="#ff0000" loext:opacity="100%" fo:background-color="#ffbf00" loext:char-shading-value="0"/>
    </style:style>
    <style:style style:name="T19" style:family="text">
      <style:text-properties style:font-name="Carlito" fo:font-size="12pt" style:font-size-asian="12pt" style:font-name-complex="Carlito" style:font-size-complex="12pt"/>
    </style:style>
    <style:style style:name="T20" style:family="text">
      <style:text-properties style:font-name="Carlito" fo:font-size="12pt" fo:background-color="transparent" loext:char-shading-value="0" style:font-size-asian="12pt" style:font-name-complex="Carlito" style:font-size-complex="12pt"/>
    </style:style>
    <style:style style:name="T21" style:family="text">
      <style:text-properties style:font-name="Carlito" fo:font-size="12pt" fo:background-color="#fff5ce" loext:char-shading-value="0" style:font-size-asian="12pt" style:font-name-complex="Carlito" style:font-size-complex="12pt"/>
    </style:style>
    <style:style style:name="T22" style:family="text">
      <style:text-properties style:font-name="Carlito" fo:font-size="12pt" fo:background-color="#ffbf00" loext:char-shading-value="0" style:font-size-asian="12pt" style:font-name-complex="Carlito" style:font-size-complex="12pt"/>
    </style:style>
    <style:style style:name="T23" style:family="text">
      <style:text-properties style:font-name="Carlito" fo:font-size="12pt" fo:background-color="#dee6ef" loext:char-shading-value="0" style:font-size-asian="12pt" style:font-name-complex="Carlito" style:font-size-complex="12pt"/>
    </style:style>
    <style:style style:name="T24" style:family="text">
      <style:text-properties style:text-position="super 58%" style:font-name="Carlito" fo:font-size="12pt" officeooo:rsid="06c74108" fo:background-color="transparent" loext:char-shading-value="0" style:font-size-asian="12pt" style:font-name-complex="Carlito" style:font-size-complex="12pt"/>
    </style:style>
    <style:style style:name="T25" style:family="text">
      <style:text-properties style:font-name="Carlito" fo:font-size="12pt" fo:background-color="#ffff00" loext:char-shading-value="0" style:font-size-asian="12pt" style:font-name-complex="Carlito" style:font-size-complex="12pt"/>
    </style:style>
    <style:style style:name="T26" style:family="text">
      <style:text-properties officeooo:rsid="06b36aee"/>
    </style:style>
    <style:style style:name="T27" style:family="text">
      <style:text-properties officeooo:rsid="06dd4353"/>
    </style:style>
    <style:style style:name="T28" style:family="text">
      <style:text-properties officeooo:rsid="06b509df"/>
    </style:style>
    <style:style style:name="T29" style:family="text">
      <style:text-properties officeooo:rsid="06c0b299"/>
    </style:style>
    <style:style style:name="T30" style:family="text">
      <style:text-properties officeooo:rsid="06b484c2"/>
    </style:style>
    <style:style style:name="T31" style:family="text">
      <style:text-properties officeooo:rsid="06b54423"/>
    </style:style>
    <style:style style:name="T32" style:family="text">
      <style:text-properties officeooo:rsid="06b7b2c6"/>
    </style:style>
    <style:style style:name="T33" style:family="text">
      <style:text-properties officeooo:rsid="06b7cf55"/>
    </style:style>
    <style:style style:name="T34" style:family="text">
      <style:text-properties officeooo:rsid="06b80ead"/>
    </style:style>
    <style:style style:name="T35" style:family="text">
      <style:text-properties officeooo:rsid="06b933f7"/>
    </style:style>
    <style:style style:name="T36" style:family="text">
      <style:text-properties fo:color="#127622" loext:opacity="100%" style:font-name="Gabriela Nerd Font" fo:font-size="12pt" fo:language="en" fo:country="US" officeooo:rsid="06c19003" style:letter-kerning="false" style:font-name-asian="DejaVu Sans" style:font-size-asian="12pt" style:language-asian="zh" style:country-asian="CN" style:font-name-complex="Carlito" style:font-size-complex="12pt" style:language-complex="hi" style:country-complex="IN"/>
    </style:style>
    <style:style style:name="T37" style:family="text">
      <style:text-properties officeooo:rsid="06c4a07d"/>
    </style:style>
    <style:style style:name="T38" style:family="text">
      <style:text-properties officeooo:rsid="06c313bf"/>
    </style:style>
    <style:style style:name="T39" style:family="text">
      <style:text-properties officeooo:rsid="06bc4f5a"/>
    </style:style>
    <style:style style:name="T40" style:family="text">
      <style:text-properties officeooo:rsid="06be289b"/>
    </style:style>
    <style:style style:name="T41" style:family="text">
      <style:text-properties officeooo:rsid="06d4c2bc"/>
    </style:style>
    <style:style style:name="T42" style:family="text">
      <style:text-properties officeooo:rsid="06bc4f5a" fo:background-color="#ffff00" loext:char-shading-value="0"/>
    </style:style>
    <style:style style:name="T43" style:family="text">
      <style:text-properties officeooo:rsid="06c7410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<text:span text:style-name="T2">he</text:span> garden of the LORD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">Genesis 2:8</text:p>
            <text:p text:style-name="P4">And <text:span text:style-name="T3">the LORD God planted a garden</text:span> eastward in Eden; and there he put the man whom he had formed.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3">Psalms 1:3</text:p>
            <text:p text:style-name="P5">And he shall be like a <text:span text:style-name="T4">tree</text:span> planted by the <text:span text:style-name="T5">rivers of water</text:span>, that bringeth forth his fruit in his season; his leaf also shall not wither; and whatsoever he doeth shall prosper.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5"><text:span text:style-name="T6">John 15:1-6</text:span><text:line-break/><text:span text:style-name="T7">1</text:span><text:span text:style-name="T8"> I am the true vine, and </text:span><text:span text:style-name="T9">my Father is the husbandman</text:span><text:span text:style-name="T8">. <text:line-break/></text:span><text:span text:style-name="T7">2</text:span><text:span text:style-name="T8"> Every </text:span><text:span text:style-name="T10">branch in me</text:span><text:span text:style-name="T8"> that beareth not fruit he taketh away: and every </text:span><text:span text:style-name="T11">branch</text:span><text:span text:style-name="T8"> that beareth fruit, he purgeth it, that it may bring forth more fruit. <text:line-break/></text:span><text:span text:style-name="T7">3</text:span><text:span text:style-name="T8"> Now ye are clean through the word which I have spoken unto you. <text:line-break/></text:span><text:span text:style-name="T7">4</text:span><text:span text:style-name="T8"> Abide in me, and I in you. As the branch cannot bear fruit of itself, except it abide in the vine; no more can ye, except ye abide in me. <text:line-break/></text:span><text:span text:style-name="T7">5</text:span><text:span text:style-name="T8"> I am the vine, ye </text:span><text:span text:style-name="T11">are</text:span><text:span text:style-name="T8"> the branches: </text:span><text:span text:style-name="T10">He that abideth in me</text:span><text:span text:style-name="T8">, </text:span><text:span text:style-name="T10">and I in him</text:span><text:span text:style-name="T8">, the same bringeth forth much fruit: for without me ye can do nothing. <text:line-break/></text:span><text:span text:style-name="T7">6</text:span><text:span text:style-name="T8"> </text:span><text:span text:style-name="T12">If a man abide not in me, he is cast forth as a branch, and is withered; and men gather them, and cast </text:span><text:span text:style-name="T13">them</text:span><text:span text:style-name="T12"> into the fire, and they are burned.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3">Genesis 3:14,<text:span text:style-name="T14">15</text:span></text:p>
            <text:p text:style-name="P4"><text:span text:style-name="T15">14</text:span><text:span text:style-name="T14"> </text:span>And <text:span text:style-name="T3">the LORD God</text:span> said unto the <text:span text:style-name="T16">serpent</text:span>, Because thou hast done this, thou art cursed above all cattle, and above every beast of the field; upon thy belly shalt thou go, and dust shalt thou eat all the days of thy life:<text:line-break/><text:span text:style-name="T17">15</text:span> And I will put enmity between <text:span text:style-name="T16">thee</text:span> and <text:span text:style-name="T4">the woman</text:span>, and between <text:span text:style-name="T16">thy seed</text:span> and <text:span text:style-name="T4">her seed</text:span>; <text:span text:style-name="T4">it</text:span> shall bruise <text:span text:style-name="T16">thy head</text:span>, and <text:span text:style-name="T16">thou</text:span> shalt bruise <text:span text:style-name="T4">his heel</text:span>.</text:p>
          </table:table-cell>
          <table:covered-table-cell/>
        </table:table-row>
        <table:table-row>
          <table:table-cell table:style-name="Table5.A5" office:value-type="string">
            <text:p text:style-name="P3">Matthew 3:10</text:p>
            <text:p text:style-name="P4">And now also the axe is laid unto the root of the trees: therefore every tree which bringeth not forth good fruit is hewn down, and <text:span text:style-name="T16">cast into the fire</text:span>.</text:p>
          </table:table-cell>
          <table:table-cell table:style-name="Table5.A2" office:value-type="string">
            <text:p text:style-name="P3">Luke 3:9</text:p>
            <text:p text:style-name="P4">And now also the axe is laid unto the root of the trees: every tree therefore which bringeth not forth good fruit is hewn down, and <text:span text:style-name="T16">cast into the fire</text:span>.</text:p>
          </table:table-cell>
        </table:table-row>
        <table:table-row>
          <table:table-cell table:style-name="Table5.A2" table:number-columns-spanned="2" office:value-type="string">
            <text:p text:style-name="P3">Matthew 15:13</text:p>
            <text:p text:style-name="P5">But he answered and said, <text:span text:style-name="T8">Every plant, which </text:span><text:span text:style-name="T9">my heavenly Father</text:span> <text:span text:style-name="T8">hath</text:span> <text:span text:style-name="T12">not planted</text:span><text:span text:style-name="T8">, </text:span><text:span text:style-name="T12">shall be rooted up</text:span><text:span text:style-name="T8">.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5"><text:span text:style-name="T6">John 4:13-14</text:span><text:line-break/><text:span text:style-name="T17">13</text:span> Jesus answered and said unto her, <text:span text:style-name="T18">Whosoever drinketh of this water</text:span><text:span text:style-name="T8"> shall thirst again:</text:span><text:line-break/><text:span text:style-name="T17">14</text:span> <text:span text:style-name="T8">But </text:span><text:span text:style-name="T18">whosoever drinketh of the water that I shall give him</text:span><text:span text:style-name="T8"> shall never thirst; but </text:span><text:span text:style-name="T18">the water that I shall give</text:span><text:span text:style-name="T8"> him shall be in him a well of water springing up into everlasting life.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6">Ezekiel 31:16</text:p>
            <text:p text:style-name="P5"><text:span text:style-name="T19">I made the nations to shake at the sound of his fall, when I </text:span><text:span text:style-name="T20">cast him down to hell with them that descend into the pit: and all </text:span><text:span text:style-name="T21">the trees of Eden</text:span><text:span text:style-name="T20">, </text:span><text:span text:style-name="T21">the choice and best of Lebanon</text:span><text:span text:style-name="T20">, </text:span><text:span text:style-name="T22">all that drink water</text:span><text:span text:style-name="T20">, </text:span><text:span text:style-name="T23">shall be comforted</text:span><text:span text:style-name="T24">H5162</text:span> <text:span text:style-name="T23">in the nether part</text:span><text:span text:style-name="T25">s</text:span><text:span text:style-name="T23"> of the earth</text:span><text:span text:style-name="T20">.</text:span></text:p>
          </table:table-cell>
          <table:covered-table-cell/>
        </table:table-row>
      </table:table>
      <text:list text:style-name="L1">
        <text:list-item>
          <text:p text:style-name="P7">Knowing that <text:span text:style-name="T26">sometimes people are portrayed as trees (Jotham’s parable, </text:span><text:span text:style-name="T6">Judges 9:7-15</text:span><text:span text:style-name="T26">; </text:span><text:span text:style-name="T27">a</text:span><text:span text:style-name="T28"> blessed man </text:span><text:span text:style-name="T29">or woman</text:span><text:span text:style-name="T28">, </text:span><text:span text:style-name="T6">Psalm 1:3</text:span><text:span text:style-name="T30">, </text:span><text:span text:style-name="T6">1 Chronicles 16:33</text:span><text:span text:style-name="T31">, </text:span><text:span text:style-name="T6">Matthew 7:17-19, 12:33</text:span><text:span text:style-name="T32">, </text:span><text:span text:style-name="T6">Luke 6:43,44, 13:6,7</text:span><text:span text:style-name="T33">, </text:span><text:span text:style-name="T6">John 15:1-6</text:span><text:span text:style-name="T34">) </text:span><text:span text:style-name="T35">let’s look at a different part of </text:span><text:span text:style-name="T6">Eze</text:span><text:span text:style-name="T36">kiel</text:span><text:span text:style-name="T6"> 31:16</text:span><text:span text:style-name="T35"> </text:span><text:span text:style-name="T37">while </text:span><text:span text:style-name="T38">substituting figures for what they represent.</text:span></text:p>
        </text:list-item>
        <text:list-item>
          <text:p text:style-name="P7">“<text:span text:style-name="T39">the trees of Eden, the choice and best of Lebanon, all that drink water” are </text:span><text:span text:style-name="T40">all three describing </text:span><text:span text:style-name="T41">the same people: those in Christ.</text:span></text:p>
        </text:list-item>
        <text:list-item>
          <text:p text:style-name="P7">“<text:span text:style-name="T39">the nether part</text:span><text:span text:style-name="T42">s</text:span><text:span text:style-name="T39"> of the earth” is hell.</text:span></text:p>
        </text:list-item>
        <text:list-item>
          <text:p text:style-name="P8">So, putting them together, the verselet is talking about the dead in Christ waiting in hell.</text:p>
        </text:list-item>
        <text:list-item>
          <text:p text:style-name="P9"><text:soft-page-break/>But what <text:span text:style-name="T43">does the future tense </text:span>“shall be comforted” <text:span text:style-name="T43">mean</text:span>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lackChancery" svg:font-family="BlackChancery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fo:padding="0.0201in" fo:border="0.74pt solid #00000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3T13:41:39.984074571</meta:creation-date>
    <dc:title>default</dc:title>
    <meta:editing-duration>PT11S</meta:editing-duration>
    <meta:editing-cycles>3</meta:editing-cycles>
    <meta:generator>LibreOffice/26.2.4.2$Linux_X86_64 LibreOffice_project/64a984c51f4702dbd3710b13428c673a2f1292e7</meta:generator>
    <dc:date>2026-07-11T12:19:35.476313100</dc:date>
    <meta:document-statistic meta:table-count="1" meta:image-count="0" meta:object-count="0" meta:page-count="2" meta:paragraph-count="22" meta:word-count="587" meta:character-count="3032" meta:non-whitespace-character-count="2467"/>
    <meta:template xlink:type="simple" xlink:actuate="onRequest" xlink:title="default" xlink:href="../../../../Templates/default1.ott" meta:date="2025-07-03T13:41:39.712679797"/>
  </office:meta>
</office:document-meta>
</file>