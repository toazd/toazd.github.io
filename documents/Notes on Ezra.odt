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4*"/>
    </style:style>
    <style:style style:name="Table1.B" style:family="table-column">
      <style:table-column-properties style:column-width="2.6333in" style:rel-column-width="21845*"/>
    </style:style>
    <style:style style:name="Table1.C" style:family="table-column">
      <style:table-column-properties style:column-width="2.6333in" style:rel-column-width="21846*"/>
    </style:style>
    <style:style style:name="Table1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eeeeee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15d7a3" officeooo:paragraph-rsid="0015d7a3"/>
    </style:style>
    <style:style style:name="P2" style:family="paragraph" style:parent-style-name="Standard">
      <style:text-properties officeooo:rsid="00197684" officeooo:paragraph-rsid="00197684"/>
    </style:style>
    <style:style style:name="P3" style:family="paragraph" style:parent-style-name="Standard">
      <style:text-properties officeooo:paragraph-rsid="002ade78"/>
    </style:style>
    <style:style style:name="P4" style:family="paragraph" style:parent-style-name="Standard">
      <style:text-properties officeooo:rsid="0015d7a3" officeooo:paragraph-rsid="0015d7a3"/>
    </style:style>
    <style:style style:name="P5" style:family="paragraph" style:parent-style-name="Standard">
      <style:text-properties officeooo:rsid="001c1394" officeooo:paragraph-rsid="001c1394"/>
    </style:style>
    <style:style style:name="P6" style:family="paragraph" style:parent-style-name="Standard">
      <style:text-properties officeooo:rsid="002ca737" officeooo:paragraph-rsid="002ca73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ba93" officeooo:paragraph-rsid="0020ba93" style:font-weight-asian="bold" style:font-weight-complex="bold"/>
    </style:style>
    <style:style style:name="P8" style:family="paragraph" style:parent-style-name="Table_20_Contents">
      <style:text-properties fo:color="#127622" loext:opacity="100%" officeooo:rsid="0020ba93" officeooo:paragraph-rsid="0020ba93"/>
    </style:style>
    <style:style style:name="P9" style:family="paragraph" style:parent-style-name="Table_20_Contents">
      <style:text-properties officeooo:rsid="0020ba93" officeooo:paragraph-rsid="0020ba93"/>
    </style:style>
    <style:style style:name="P10" style:family="paragraph" style:parent-style-name="Table_20_Contents">
      <style:text-properties officeooo:rsid="0022874c" officeooo:paragraph-rsid="0022874c"/>
    </style:style>
    <style:style style:name="P11" style:family="paragraph" style:parent-style-name="Table_20_Contents">
      <style:text-properties fo:color="#127622" loext:opacity="100%" officeooo:rsid="0022d91c" officeooo:paragraph-rsid="0022d91c"/>
    </style:style>
    <style:style style:name="P12" style:family="paragraph" style:parent-style-name="Table_20_Contents">
      <style:text-properties officeooo:rsid="00245e24" officeooo:paragraph-rsid="00245e24"/>
    </style:style>
    <style:style style:name="P13" style:family="paragraph" style:parent-style-name="Table_20_Contents">
      <style:text-properties officeooo:rsid="00245e24" officeooo:paragraph-rsid="00276527"/>
    </style:style>
    <style:style style:name="P14" style:family="paragraph" style:parent-style-name="Table_20_Contents">
      <style:text-properties officeooo:rsid="00276527" officeooo:paragraph-rsid="00276527"/>
    </style:style>
    <style:style style:name="P15" style:family="paragraph" style:parent-style-name="Table_20_Contents">
      <style:text-properties fo:color="#127622" loext:opacity="100%" officeooo:rsid="0025f78f" officeooo:paragraph-rsid="0025f78f"/>
    </style:style>
    <style:style style:name="P16" style:family="paragraph" style:parent-style-name="Table_20_Contents">
      <style:text-properties officeooo:rsid="0025f78f" officeooo:paragraph-rsid="0025f78f"/>
    </style:style>
    <style:style style:name="P17" style:family="paragraph" style:parent-style-name="Table_20_Contents">
      <style:text-properties officeooo:rsid="00287dc9" officeooo:paragraph-rsid="00287dc9"/>
    </style:style>
    <style:style style:name="P18" style:family="paragraph" style:parent-style-name="Table_20_Contents">
      <style:text-properties officeooo:paragraph-rsid="0032419d"/>
    </style:style>
    <style:style style:name="P19" style:family="paragraph" style:parent-style-name="Table_20_Contents">
      <style:text-properties officeooo:rsid="0032419d" officeooo:paragraph-rsid="0037d3f4"/>
    </style:style>
    <style:style style:name="P20" style:family="paragraph" style:parent-style-name="Table_20_Contents">
      <style:text-properties officeooo:rsid="0032419d" officeooo:paragraph-rsid="0032419d"/>
    </style:style>
    <style:style style:name="P21" style:family="paragraph" style:parent-style-name="Table_20_Contents">
      <style:text-properties officeooo:rsid="00338c9d" officeooo:paragraph-rsid="00338c9d"/>
    </style:style>
    <style:style style:name="P22" style:family="paragraph" style:parent-style-name="Standard">
      <style:text-properties officeooo:rsid="0029347e" officeooo:paragraph-rsid="0029347e"/>
    </style:style>
    <style:style style:name="P23" style:family="paragraph" style:parent-style-name="Table_20_Contents">
      <style:text-properties fo:color="#127622" loext:opacity="100%"/>
    </style:style>
    <style:style style:name="P24" style:family="paragraph" style:parent-style-name="Standard">
      <style:text-properties officeooo:rsid="0029e0df" officeooo:paragraph-rsid="0029e0df"/>
    </style:style>
    <style:style style:name="T1" style:family="text">
      <style:text-properties officeooo:rsid="0019c55a"/>
    </style:style>
    <style:style style:name="T2" style:family="text">
      <style:text-properties fo:color="#127622" loext:opacity="100%" officeooo:rsid="0019c55a"/>
    </style:style>
    <style:style style:name="T3" style:family="text">
      <style:text-properties officeooo:rsid="0015d7a3"/>
    </style:style>
    <style:style style:name="T4" style:family="text">
      <style:text-properties officeooo:rsid="0017a6e2"/>
    </style:style>
    <style:style style:name="T5" style:family="text">
      <style:text-properties fo:color="#127622" loext:opacity="100%" officeooo:rsid="0018ff49"/>
    </style:style>
    <style:style style:name="T6" style:family="text">
      <style:text-properties fo:color="#127622" loext:opacity="100%" officeooo:rsid="0015d7a3"/>
    </style:style>
    <style:style style:name="T7" style:family="text">
      <style:text-properties fo:color="#127622" loext:opacity="100%" fo:font-weight="bold" officeooo:rsid="0015d7a3" style:font-weight-asian="bold" style:font-weight-complex="bold"/>
    </style:style>
    <style:style style:name="T8" style:family="text">
      <style:text-properties officeooo:rsid="002ade78"/>
    </style:style>
    <style:style style:name="T9" style:family="text">
      <style:text-properties fo:color="#127622" loext:opacity="100%" officeooo:rsid="002ade78"/>
    </style:style>
    <style:style style:name="T10" style:family="text">
      <style:text-properties fo:color="#127622" loext:opacity="100%" fo:font-weight="bold" officeooo:rsid="002ade78" style:font-weight-asian="bold" style:font-weight-complex="bold"/>
    </style:style>
    <style:style style:name="T11" style:family="text">
      <style:text-properties style:text-position="super 58%" officeooo:rsid="002ade78"/>
    </style:style>
    <style:style style:name="T12" style:family="text">
      <style:text-properties officeooo:rsid="001f895d"/>
    </style:style>
    <style:style style:name="T13" style:family="text">
      <style:text-properties style:text-position="super 58%"/>
    </style:style>
    <style:style style:name="T14" style:family="text">
      <style:text-properties fo:color="#127622" loext:opacity="100%"/>
    </style:style>
    <style:style style:name="T15" style:family="text">
      <style:text-properties fo:color="#127622" loext:opacity="100%" officeooo:rsid="001dbe63"/>
    </style:style>
    <style:style style:name="T16" style:family="text">
      <style:text-properties officeooo:rsid="001dbe63"/>
    </style:style>
    <style:style style:name="T17" style:family="text">
      <style:text-properties officeooo:rsid="002e06d7"/>
    </style:style>
    <style:style style:name="T18" style:family="text">
      <style:text-properties officeooo:rsid="002e7a9e"/>
    </style:style>
    <style:style style:name="T19" style:family="text">
      <style:text-properties officeooo:rsid="003079a7"/>
    </style:style>
    <style:style style:name="T20" style:family="text">
      <style:text-properties officeooo:rsid="0022874c"/>
    </style:style>
    <style:style style:name="T21" style:family="text">
      <style:text-properties officeooo:rsid="0022d91c"/>
    </style:style>
    <style:style style:name="T22" style:family="text">
      <style:text-properties style:text-position="super 58%" officeooo:rsid="0022d91c"/>
    </style:style>
    <style:style style:name="T23" style:family="text">
      <style:text-properties officeooo:rsid="00221256"/>
    </style:style>
    <style:style style:name="T24" style:family="text">
      <style:text-properties officeooo:rsid="00289ea1"/>
    </style:style>
    <style:style style:name="T25" style:family="text">
      <style:text-properties fo:color="#127622" loext:opacity="100%" officeooo:rsid="00289ea1"/>
    </style:style>
    <style:style style:name="T26" style:family="text">
      <style:text-properties fo:color="#127622" loext:opacity="100%" officeooo:rsid="0032419d"/>
    </style:style>
    <style:style style:name="T27" style:family="text">
      <style:text-properties fo:color="#127622" loext:opacity="100%" officeooo:rsid="00368ac1"/>
    </style:style>
    <style:style style:name="T28" style:family="text">
      <style:text-properties officeooo:rsid="0037d3f4"/>
    </style:style>
    <style:style style:name="T29" style:family="text">
      <style:text-properties officeooo:rsid="00338c9d"/>
    </style:style>
    <style:style style:name="T30" style:family="text">
      <style:text-properties officeooo:rsid="0035884a"/>
    </style:style>
    <style:style style:name="T31" style:family="text">
      <style:text-properties fo:color="#127622" loext:opacity="100%" officeooo:rsid="00338c9d"/>
    </style:style>
    <style:style style:name="T32" style:family="text">
      <style:text-properties officeooo:rsid="0035d402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2b470d"/>
    </style:style>
    <style:style style:name="T35" style:family="text">
      <style:text-properties officeooo:rsid="002b9239"/>
    </style:style>
    <style:style style:name="T36" style:family="text">
      <style:text-properties officeooo:rsid="002c57b9"/>
    </style:style>
    <style:style style:name="T37" style:family="text">
      <style:text-properties fo:color="#127622" loext:opacity="100%" officeooo:rsid="002c57b9"/>
    </style:style>
    <style:style style:name="T38" style:family="text">
      <style:text-properties style:text-position="super 58%" officeooo:rsid="002c5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about Ezra</text:p>
      <text:p text:style-name="Standard"/>
      <text:p text:style-name="P2">He was descended from (Aaron + Elisheba) → (Eleazar + ???) → Phineas <text:span text:style-name="T1">(</text:span><text:span text:style-name="T2">Num 25:12,13</text:span><text:span text:style-name="T1">) </text:span>→ … → Seraiah → Ezra (see chart Levi.odg for references)</text:p>
      <text:p text:style-name="Standard"/>
      <text:p text:style-name="P3"><text:span text:style-name="T3">His immediate ancestor </text:span><text:span text:style-name="T4">(</text:span><text:span text:style-name="T3">the </text:span><text:span text:style-name="T4">chief</text:span><text:span text:style-name="T3"> priest; </text:span><text:span text:style-name="T5">Num 3:32</text:span><text:span text:style-name="T4">)</text:span><text:span text:style-name="T3"> Seraiah was murdered by Nebuchadnezzar (</text:span><text:span text:style-name="T6">2Ki </text:span><text:span text:style-name="T7">25</text:span><text:span text:style-name="T6">:18,20-21</text:span><text:span text:style-name="T3">, </text:span><text:span text:style-name="T6">Ezra 7:1</text:span><text:span text:style-name="T3">) near the beginning of the Babylonian captivity </text:span><text:span text:style-name="T8">(</text:span><text:span text:style-name="T9">2Ki </text:span><text:span text:style-name="T10">24</text:span><text:span text:style-name="T8"> is the 2</text:span><text:span text:style-name="T11">nd</text:span><text:span text:style-name="T8"> siege which is when the captivity officially began </text:span><text:span text:style-name="T9">2Ch 36:9,10</text:span><text:span text:style-name="T8">, </text:span><text:span text:style-name="T9">Jer 29:1,2,10</text:span><text:span text:style-name="T8">; </text:span><text:span text:style-name="T9">2Ki 24</text:span><text:span text:style-name="T8">)</text:span><text:span text:style-name="T3">.</text:span></text:p>
      <text:p text:style-name="P4"/>
      <text:p text:style-name="P5">Jeshua/<text:span text:style-name="T12">Joshua</text:span> son of Jozadak was high priest during the 7<text:span text:style-name="T13">th</text:span> month after the first wave of returnees (<text:span text:style-name="T14">Ezra 3:2</text:span>, <text:span text:style-name="T14">Hag 1:1</text:span>, <text:span text:style-name="T15">Zec 6:11</text:span><text:span text:style-name="T16">).</text:span></text:p>
      <text:p text:style-name="P5"/>
      <text:p text:style-name="P6">Jeshua/<text:span text:style-name="T17">Joshua’s</text:span> grandson Eliashib (<text:span text:style-name="T14">Neh 3:1</text:span>) son of Joiakim (<text:span text:style-name="T14">Neh 12:10</text:span>) served as high priest, <text:span text:style-name="T18">it appears, after him </text:span><text:span text:style-name="T19">because no other high priest is recorded serving between them (but that also doesn’t mean one didn’t)</text:span>.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Ref</text:p>
          </table:table-cell>
          <table:table-cell table:style-name="Table1.A1" office:value-type="string">
            <text:p text:style-name="P7">Time</text:p>
          </table:table-cell>
          <table:table-cell table:style-name="Table1.C1" office:value-type="string">
            <text:p text:style-name="P7">Event</text:p>
          </table:table-cell>
        </table:table-row>
        <table:table-row>
          <table:table-cell table:style-name="Table1.A2" office:value-type="string">
            <text:p text:style-name="P8">Ezra 7:7-<text:span text:style-name="T20">9</text:span></text:p>
          </table:table-cell>
          <table:table-cell table:style-name="Table1.B2" office:value-type="string">
            <text:p text:style-name="P9">7<text:span text:style-name="T13">th</text:span> year of Araxerxes</text:p>
            <text:p text:style-name="P10">1<text:span text:style-name="T13">st</text:span> day, 1<text:span text:style-name="T13">st</text:span> month</text:p>
          </table:table-cell>
          <table:table-cell table:style-name="Table1.C2" office:value-type="string">
            <text:p text:style-name="P9">Ezra and company leaves Babylon</text:p>
          </table:table-cell>
        </table:table-row>
        <table:table-row>
          <table:table-cell table:style-name="Table1.A3" office:value-type="string">
            <text:p text:style-name="P11"/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13">4 months traveling from Babylon to Jerusalem</text:p>
            <text:p text:style-name="P14">(~550 miles if the went straight east across the desert; ~730 miles if they took the northern route)</text:p>
          </table:table-cell>
        </table:table-row>
        <table:table-row>
          <table:table-cell table:style-name="Table1.A3" office:value-type="string">
            <text:p text:style-name="P11">Ezra 7:9</text:p>
          </table:table-cell>
          <table:table-cell table:style-name="Table1.B3" office:value-type="string">
            <text:p text:style-name="P9"><text:span text:style-name="T21">1</text:span><text:span text:style-name="T22">st</text:span><text:span text:style-name="T21"> day, </text:span>5<text:span text:style-name="T13">th</text:span> month</text:p>
          </table:table-cell>
          <table:table-cell table:style-name="Table1.C3" office:value-type="string">
            <text:p text:style-name="P9">They arrive at Jerusalem <text:span text:style-name="T23">in the same year</text:span></text:p>
          </table:table-cell>
        </table:table-row>
        <table:table-row>
          <table:table-cell table:style-name="Table1.A5" office:value-type="string">
            <text:p text:style-name="P15">Nehemiah 2:1-</text:p>
          </table:table-cell>
          <table:table-cell table:style-name="Table1.B5" office:value-type="string">
            <text:p text:style-name="P16">20<text:span text:style-name="T13">th</text:span> year of Artaxerxes</text:p>
          </table:table-cell>
          <table:table-cell table:style-name="Table1.C5" office:value-type="string">
            <text:p text:style-name="P17">Nehemiah requests to <text:span text:style-name="T24">rebuild the gates, the wall, and his own house (</text:span><text:span text:style-name="T25">Neh 2:8</text:span><text:span text:style-name="T24">)</text:span></text:p>
          </table:table-cell>
        </table:table-row>
        <table:table-row>
          <table:table-cell table:style-name="Table1.A6" office:value-type="string">
            <text:p text:style-name="P18"><text:span text:style-name="T26">Neh 13:1-5</text:span> (<text:span text:style-name="T27">Neh 4:14</text:span>)</text:p>
          </table:table-cell>
          <table:table-cell table:style-name="Table1.B6" office:value-type="string">
            <text:p text:style-name="P19">32<text:span text:style-name="T13">nd</text:span> year of Artaxerxes</text:p>
            <text:p text:style-name="P19">→</text:p>
            <text:p text:style-name="P19">Nehemiah’s return</text:p>
          </table:table-cell>
          <table:table-cell table:style-name="Table1.C6" office:value-type="string">
            <text:p text:style-name="P20"><text:span text:style-name="T28">While Nehemiah is visiting the king of Babylon, </text:span>Eliashib the high priest allies with Tobiah <text:span text:style-name="T29">the Ammonite </text:span><text:span text:style-name="T30">a servant of Sanballat the Horonite </text:span><text:span text:style-name="T29">(</text:span><text:span text:style-name="T31">Neh 2:10</text:span><text:span text:style-name="T29">) and gives him a room </text:span><text:span text:style-name="T32">in the house of our God.</text:span></text:p>
            <text:p text:style-name="P20"/>
            <text:p text:style-name="P21">When Nehemiah returns he fixes this problem and more.</text:p>
          </table:table-cell>
        </table:table-row>
      </table:table>
      <text:p text:style-name="P5"/>
      <text:p text:style-name="P22">His ministry overlaps with Nehemiah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Nehemiah 8:9</text:p>
            <text:p text:style-name="Table_20_Contents">And <text:span text:style-name="T33">Nehemiah</text:span>, which is the <text:span text:style-name="T33">Tirshatha</text:span>, and <text:span text:style-name="T33">Ezra the priest the scribe</text:span>, and the Levites that taught the people, said unto all the people, This day is holy unto the LORD your God; mourn not, nor weep. For all the people wept, when they heard the words of the law.</text:p>
          </table:table-cell>
        </table:table-row>
      </table:table>
      <text:p text:style-name="P22"/>
      <text:p text:style-name="P24">Since we don’t know of any ancestors between Seraiah &amp; Ezra, we may assume that Ezra was born b<text:span text:style-name="T34">efore </text:span><text:span text:style-name="T35">Seraiah was murdered. </text:span><text:span text:style-name="T36">He returned from Babylon after at least 70 years. There was another 13 years from </text:span><text:span text:style-name="T37">Ezra 7:7</text:span><text:span text:style-name="T36"> to </text:span><text:span text:style-name="T37">Nehemiah 2:1</text:span><text:span text:style-name="T36">. Assuming he was born before the 2</text:span><text:span text:style-name="T38">nd</text:span><text:span text:style-name="T36"> siege of Jerusalem in </text:span><text:span text:style-name="T37">Neh 2:1</text:span><text:span text:style-name="T36"> he was 80-90 years ol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07:43:05.207739488</meta:creation-date>
    <dc:title>default</dc:title>
    <meta:editing-duration>PT2H42M</meta:editing-duration>
    <meta:editing-cycles>44</meta:editing-cycles>
    <meta:generator>LibreOffice/26.2.4.2$Linux_X86_64 LibreOffice_project/64a984c51f4702dbd3710b13428c673a2f1292e7</meta:generator>
    <dc:date>2026-07-11T12:29:52.333989614</dc:date>
    <meta:document-statistic meta:table-count="2" meta:image-count="0" meta:object-count="0" meta:page-count="1" meta:paragraph-count="30" meta:word-count="380" meta:character-count="2132" meta:non-whitespace-character-count="1782"/>
    <meta:template xlink:type="simple" xlink:actuate="onRequest" xlink:title="default" xlink:href="../../../../Templates/default.ott" meta:date="2026-02-24T07:43:04.356038356"/>
  </office:meta>
</office:document-meta>
</file>