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1144" officeooo:paragraph-rsid="00101144"/>
    </style:style>
    <style:style style:name="P2" style:family="paragraph" style:parent-style-name="Standard">
      <style:text-properties officeooo:paragraph-rsid="0011768b"/>
    </style:style>
    <style:style style:name="P3" style:family="paragraph" style:parent-style-name="Standard">
      <style:text-properties officeooo:rsid="0013378d" officeooo:paragraph-rsid="0013378d"/>
    </style:style>
    <style:style style:name="P4" style:family="paragraph" style:parent-style-name="Standard">
      <style:text-properties officeooo:rsid="0017192a" officeooo:paragraph-rsid="0017192a"/>
    </style:style>
    <style:style style:name="P5" style:family="paragraph" style:parent-style-name="Standard">
      <style:text-properties officeooo:rsid="00180416" officeooo:paragraph-rsid="00180416"/>
    </style:style>
    <style:style style:name="P6" style:family="paragraph" style:parent-style-name="Standard">
      <style:text-properties officeooo:rsid="00196175" officeooo:paragraph-rsid="00196175"/>
    </style:style>
    <style:style style:name="P7" style:family="paragraph" style:parent-style-name="Standard">
      <style:text-properties officeooo:rsid="001c1256" officeooo:paragraph-rsid="001c1256"/>
    </style:style>
    <style:style style:name="P8" style:family="paragraph" style:parent-style-name="Standard">
      <style:text-properties officeooo:rsid="001e0584" officeooo:paragraph-rsid="001e0584"/>
    </style:style>
    <style:style style:name="P9" style:family="paragraph" style:parent-style-name="Standard">
      <style:text-properties officeooo:rsid="001efe85" officeooo:paragraph-rsid="001efe85"/>
    </style:style>
    <style:style style:name="P10" style:family="paragraph" style:parent-style-name="Standard">
      <style:text-properties officeooo:rsid="001fbd63" officeooo:paragraph-rsid="001fbd63"/>
    </style:style>
    <style:style style:name="P11" style:family="paragraph" style:parent-style-name="Standard">
      <style:text-properties officeooo:rsid="0020c707" officeooo:paragraph-rsid="0020c707"/>
    </style:style>
    <style:style style:name="P12" style:family="paragraph" style:parent-style-name="Standard">
      <style:text-properties officeooo:rsid="00228cc5" officeooo:paragraph-rsid="00228cc5"/>
    </style:style>
    <style:style style:name="T1" style:family="text">
      <style:text-properties fo:color="#ff0000" loext:opacity="100%"/>
    </style:style>
    <style:style style:name="T2" style:family="text">
      <style:text-properties officeooo:rsid="00168614"/>
    </style:style>
    <style:style style:name="T3" style:family="text">
      <style:text-properties officeooo:rsid="0011768b"/>
    </style:style>
    <style:style style:name="T4" style:family="text">
      <style:text-properties officeooo:rsid="00163906"/>
    </style:style>
    <style:style style:name="T5" style:family="text">
      <style:text-properties officeooo:rsid="00142213"/>
    </style:style>
    <style:style style:name="T6" style:family="text">
      <style:text-properties officeooo:rsid="0015c445"/>
    </style:style>
    <style:style style:name="T7" style:family="text">
      <style:text-properties officeooo:rsid="0015e551"/>
    </style:style>
    <style:style style:name="T8" style:family="text">
      <style:text-properties officeooo:rsid="0017d1d8"/>
    </style:style>
    <style:style style:name="T9" style:family="text">
      <style:text-properties officeooo:rsid="0019f5eb"/>
    </style:style>
    <style:style style:name="T10" style:family="text">
      <style:text-properties officeooo:rsid="002310f8"/>
    </style:style>
    <style:style style:name="T11" style:family="text">
      <style:text-properties officeooo:rsid="00242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 says the phrase “<text:span text:style-name="T1">have ye not read</text:span>” a total of 7 times <text:span text:style-name="T2">in 7 verses in 5 chapters in 3 books.</text:span></text:p>
      <text:p text:style-name="P1"/>
      <text:p text:style-name="P2"><text:span text:style-name="T3">The phrase “</text:span>The grace of our Lord Jesus Christ be with you” <text:span text:style-name="T3">appears 7 times i</text:span><text:span text:style-name="T4">n 7 verses in 6 chapters in 6 books.</text:span></text:p>
      <text:p text:style-name="P2"/>
      <text:p text:style-name="P3">Delight* appears 9 times in Psalm 119 (<text:span text:style-name="T5">the number representing fruit</text:span>).</text:p>
      <text:p text:style-name="P3"/>
      <text:p text:style-name="P3">“<text:span text:style-name="T6">Word” (case-sensitive) shows up 7 times in 5 verses </text:span><text:span text:style-name="T7">in 4 chapters in 3 books.</text:span></text:p>
      <text:p text:style-name="P3"/>
      <text:p text:style-name="P4">The phrase “spirit of truth” appears 4 times in 4 verses in 4 chapters in 2 books</text:p>
      <text:p text:style-name="P4"><text:tab/>“Spirit of truth” appears 3 times in 3 verses in 3 chapters in 1 book</text:p>
      <text:p text:style-name="P4"/>
      <text:p text:style-name="P4">“Comforter” appears 4 times in 4 verses in 3 chapters in 1 book</text:p>
      <text:p text:style-name="P4"/>
      <text:p text:style-name="P4">“Jesus” appears 967 times in 929 verses in 206 chapters in 26 books</text:p>
      <text:p text:style-name="P4"/>
      <text:p text:style-name="P4">“<text:span text:style-name="T8">Jesus Christ” appears 196 times in 187 verses in 93 chapters in 25 books</text:span></text:p>
      <text:p text:style-name="P4"/>
      <text:p text:style-name="P5">Genesis 13:13 has 13 words “But the men of Sodom were wicked and sinners before the LORD exceedingly.”</text:p>
      <text:p text:style-name="P5"/>
      <text:p text:style-name="P6">John 6:66 reads “From that time many of his disciples went back, and walked no more with him.” <text:span text:style-name="T9">(15 words)</text:span></text:p>
      <text:p text:style-name="P6"/>
      <text:p text:style-name="P7">The phrase “there is none else” appears 9 times in 9 verses (in 4 chapters in 3 books).</text:p>
      <text:p text:style-name="P7"/>
      <text:p text:style-name="P8">In the parable of the Pharisee &amp; the publican (Luke 18:9-14), in what the Pharisee says, there are five i’s.</text:p>
      <text:p text:style-name="P8"/>
      <text:p text:style-name="P9">The phrase “help us” appears 7 times in 7 verses in 7 chapters in 6 books (twice in 2Chr)</text:p>
      <text:p text:style-name="P9"/>
      <text:p text:style-name="P10">The phrase “the fowls of the air” appears 13 times in 13 verses (cf. Gen 13:13)</text:p>
      <text:p text:style-name="P10"/>
      <text:p text:style-name="P11">The word “enemy*” appears in the book of Job 5 times in 5 verses.</text:p>
      <text:p text:style-name="P11"/>
      <text:p text:style-name="P12">“slumber*” 13 times in 13 verses</text:p>
      <text:p text:style-name="P12"/>
      <text:p text:style-name="P12">“<text:span text:style-name="T10">fable*” 5 times in 5 verses</text:span></text:p>
      <text:p text:style-name="P12"/>
      <text:p text:style-name="P12">“<text:span text:style-name="T11">four winds” 9 times in 9 verses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08:14:19.658521500</meta:creation-date>
    <dc:title>default</dc:title>
    <meta:editing-duration>PT17M22S</meta:editing-duration>
    <meta:editing-cycles>24</meta:editing-cycles>
    <meta:generator>LibreOffice/25.8.4.2$Windows_X86_64 LibreOffice_project/290daaa01b999472f0c7a3890eb6a550fd74c6df</meta:generator>
    <dc:date>2026-01-04T14:13:44.961841900</dc:date>
    <meta:document-statistic meta:table-count="0" meta:image-count="0" meta:object-count="0" meta:page-count="1" meta:paragraph-count="19" meta:word-count="288" meta:character-count="1439" meta:non-whitespace-character-count="1169"/>
    <meta:template xlink:type="simple" xlink:actuate="onRequest" xlink:title="default" xlink:href="../../../../AppData/Roaming/LibreOffice/4/user/template/default.ott" meta:date="2026-01-02T10:24:33.046565700"/>
  </office:meta>
</office:document-meta>
</file>