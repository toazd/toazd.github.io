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background-color="#fff5c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Joshua 9:3-7</text:span><text:line-break/><text:span text:style-name="T2">3</text:span> And when the <text:span text:style-name="T3">inhabitants of Gibeon</text:span> heard what Joshua had done unto Jericho and to Ai, <text:span text:style-name="T2">4</text:span> They did work wilily, and went and made as if they had been ambassadors, and took old sacks upon their asses, and wine bottles, old, and rent, and bound up; <text:span text:style-name="T2">5</text:span> And old shoes and clouted upon their feet, and old garments upon them; and all the bread of their provision was dry and mouldy. <text:span text:style-name="T2">6</text:span> And they went to Joshua unto the camp at Gilgal, and said unto him, and to the men of Israel, We be come from a far country: now therefore make ye a league with us. <text:span text:style-name="T2">7</text:span> And the men of Israel said unto the <text:span text:style-name="T3">Hivites</text:span>, Peradventure ye dwell among us; and how shall we make a league with you?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2 Samuel 21:1-2</text:span><text:line-break/><text:span text:style-name="T2">1</text:span> Then there was a famine in the days of David three years, year after year; and David enquired of the LORD. And the LORD answered, It is for Saul, and for his bloody house, because he slew the Gibeonites. <text:span text:style-name="T2">2</text:span> And the king called the Gibeonites, and said unto them; (now the <text:span text:style-name="T3">Gibeonites</text:span> were not of the children of Israel, but <text:span text:style-name="T3">of the remnant of the Amorites</text:span>; and the children of Israel had sworn unto them: and Saul sought to slay them in his zeal to the children of Israel and Judah.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4T08:15:36.063228600</meta:creation-date>
    <dc:title>default</dc:title>
    <meta:editing-duration>PT4M8S</meta:editing-duration>
    <meta:editing-cycles>6</meta:editing-cycles>
    <meta:generator>LibreOffice/26.2.4.2$Linux_X86_64 LibreOffice_project/64a984c51f4702dbd3710b13428c673a2f1292e7</meta:generator>
    <dc:date>2026-07-11T12:20:14.147415969</dc:date>
    <meta:document-statistic meta:table-count="2" meta:image-count="0" meta:object-count="0" meta:page-count="1" meta:paragraph-count="2" meta:word-count="231" meta:character-count="1174" meta:non-whitespace-character-count="945"/>
    <meta:template xlink:type="simple" xlink:actuate="onRequest" xlink:title="default" xlink:href="../../../../AppData/Roaming/LibreOffice/4/user/template/default.ott" meta:date="2025-09-04T08:15:35.368816600"/>
  </office:meta>
</office:document-meta>
</file>