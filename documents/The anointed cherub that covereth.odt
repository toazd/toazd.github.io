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6.9167in" style:rel-column-width="57377*"/>
    </style:style>
    <style:style style:name="Table1.B" style:family="table-column">
      <style:table-column-properties style:column-width="0.9833in" style:rel-column-width="8158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3" style:family="table">
      <style:table-properties style:width="7.9in" table:align="margins"/>
    </style:style>
    <style:style style:name="Table13.A" style:family="table-column">
      <style:table-column-properties style:column-width="1.6667in" style:rel-column-width="13825*"/>
    </style:style>
    <style:style style:name="Table13.B" style:family="table-column">
      <style:table-column-properties style:column-width="6.2333in" style:rel-column-width="51710*"/>
    </style:style>
    <style:style style:name="Table13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3.B1" style:family="table-cell">
      <style:table-cell-properties fo:padding="0.0382in" fo:border="0.75pt solid #000000"/>
    </style:style>
    <style:style style:name="Table13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3.B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4.6847in" style:rel-column-width="38863*"/>
    </style:style>
    <style:style style:name="Table12.B" style:family="table-column">
      <style:table-column-properties style:column-width="3.2153in" style:rel-column-width="26672*"/>
    </style:style>
    <style:style style:name="Table1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2.B1" style:family="table-cell">
      <style:table-cell-properties style:vertical-align="middle" fo:padding="0.0382in" fo:border="0.75pt solid #000000"/>
    </style:style>
    <style:style style:name="Table12.A2" style:family="table-cell">
      <style:table-cell-properties fo:padding="0.0382in" fo:border-left="0.75pt solid #000000" fo:border-right="none" fo:border-top="none" fo:border-bottom="0.75pt solid #000000"/>
    </style:style>
    <style:style style:name="Table14" style:family="table">
      <style:table-properties style:width="7.9in" table:align="margins"/>
    </style:style>
    <style:style style:name="Table14.A" style:family="table-column">
      <style:table-column-properties style:column-width="7.9in" style:rel-column-width="65535*"/>
    </style:style>
    <style:style style:name="Table14.A1" style:family="table-cell">
      <style:table-cell-properties fo:padding="0.0382in" fo:border="0.7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75pt solid #000000"/>
    </style:style>
    <style:style style:name="Table6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75pt solid #000000"/>
    </style:style>
    <style:style style:name="Table8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5" style:family="table">
      <style:table-properties style:width="7.9in" table:align="margins"/>
    </style:style>
    <style:style style:name="Table15.A" style:family="table-column">
      <style:table-column-properties style:column-width="7.9in" style:rel-column-width="65535*"/>
    </style:style>
    <style:style style:name="Table15.A1" style:family="table-cell">
      <style:table-cell-properties fo:padding="0.0382in" fo:border="0.7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7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75pt solid #000000"/>
    </style:style>
    <style:style style:name="Table7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75pt solid #000000"/>
    </style:style>
    <style:style style:name="Table2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7" style:family="table">
      <style:table-properties style:width="7.9in" table:align="margins"/>
    </style:style>
    <style:style style:name="Table17.A" style:family="table-column">
      <style:table-column-properties style:column-width="7.9in" style:rel-column-width="65535*"/>
    </style:style>
    <style:style style:name="Table17.A1" style:family="table-cell">
      <style:table-cell-properties fo:padding="0.0382in" fo:border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7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7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7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5.2243in" style:rel-column-width="43338*"/>
    </style:style>
    <style:style style:name="Table10.B" style:family="table-column">
      <style:table-column-properties style:column-width="1.3674in" style:rel-column-width="11345*"/>
    </style:style>
    <style:style style:name="Table10.C" style:family="table-column">
      <style:table-column-properties style:column-width="1.3083in" style:rel-column-width="10852*"/>
    </style:style>
    <style:style style:name="Table10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0.B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0.C1" style:family="table-cell">
      <style:table-cell-properties style:vertical-align="middle" fo:padding="0.0382in" fo:border="0.75pt solid #000000"/>
    </style:style>
    <style:style style:name="Table10.A2" style:family="table-cell">
      <style:table-cell-properties fo:padding="0.0382in" fo:border-left="0.75pt solid #000000" fo:border-right="none" fo:border-top="none" fo:border-bottom="0.75pt solid #000000"/>
    </style:style>
    <style:style style:name="Table10.B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0.A3" style:family="table-cell">
      <style:table-cell-properties fo:padding="0.0382in" fo:border-left="0.75pt solid #000000" fo:border-right="none" fo:border-top="none" fo:border-bottom="0.75pt solid #000000"/>
    </style:style>
    <style:style style:name="Table10.C3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44134" officeooo:paragraph-rsid="00244134" style:font-size-asian="14pt" style:font-size-complex="14pt"/>
    </style:style>
    <style:style style:name="P2" style:family="paragraph" style:parent-style-name="Standard">
      <style:text-properties officeooo:paragraph-rsid="00726eb4"/>
    </style:style>
    <style:style style:name="P3" style:family="paragraph" style:parent-style-name="Standard">
      <style:text-properties officeooo:rsid="00726eb4" officeooo:paragraph-rsid="00793c2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16ec6" officeooo:paragraph-rsid="00793c2f" style:font-weight-asian="bold" style:font-weight-complex="bold"/>
    </style:style>
    <style:style style:name="P5" style:family="paragraph" style:parent-style-name="Table_20_Contents">
      <style:text-properties officeooo:paragraph-rsid="02531cb5"/>
    </style:style>
    <style:style style:name="P6" style:family="paragraph" style:parent-style-name="Table_20_Contents">
      <style:text-properties officeooo:rsid="00216ec6" officeooo:paragraph-rsid="00793c2f"/>
    </style:style>
    <style:style style:name="P7" style:family="paragraph" style:parent-style-name="Table_20_Contents">
      <style:text-properties officeooo:paragraph-rsid="00793c2f"/>
    </style:style>
    <style:style style:name="P8" style:family="paragraph" style:parent-style-name="Table_20_Contents">
      <style:text-properties fo:font-weight="bold" officeooo:rsid="00216ec6" officeooo:paragraph-rsid="00793c2f" style:font-weight-asian="bold" style:font-weight-complex="bold"/>
    </style:style>
    <style:style style:name="P9" style:family="paragraph" style:parent-style-name="Table_20_Contents">
      <style:text-properties officeooo:rsid="00891f7b" officeooo:paragraph-rsid="00891f7b"/>
    </style:style>
    <style:style style:name="P10" style:family="paragraph" style:parent-style-name="Table_20_Contents">
      <style:text-properties officeooo:paragraph-rsid="00891f7b"/>
    </style:style>
    <style:style style:name="P11" style:family="paragraph" style:parent-style-name="Standard" style:list-style-name="L1">
      <style:text-properties officeooo:rsid="001e4fb3" officeooo:paragraph-rsid="00793c2f"/>
    </style:style>
    <style:style style:name="P12" style:family="paragraph" style:parent-style-name="Standard" style:list-style-name="L1">
      <style:text-properties officeooo:rsid="003335fa" officeooo:paragraph-rsid="00793c2f"/>
    </style:style>
    <style:style style:name="P13" style:family="paragraph" style:parent-style-name="Standard" style:list-style-name="L1">
      <style:text-properties officeooo:paragraph-rsid="02bc270d"/>
    </style:style>
    <style:style style:name="P14" style:family="paragraph" style:parent-style-name="Standard" style:list-style-name="L1">
      <style:text-properties style:font-name="Liberation Sans" officeooo:rsid="02c6abf5" officeooo:paragraph-rsid="02c4afcd" style:font-name-complex="Liberation Sans"/>
    </style:style>
    <style:style style:name="P15" style:family="paragraph" style:parent-style-name="Standard" style:list-style-name="L1">
      <style:text-properties style:font-name="Liberation Sans" officeooo:rsid="02c6abf5" officeooo:paragraph-rsid="02c6abf5" style:font-name-complex="Liberation Sans"/>
    </style:style>
    <style:style style:name="P16" style:family="paragraph" style:parent-style-name="Standard">
      <style:text-properties officeooo:rsid="003335fa" officeooo:paragraph-rsid="00793c2f"/>
    </style:style>
    <style:style style:name="P17" style:family="paragraph" style:parent-style-name="Standard">
      <style:text-properties officeooo:paragraph-rsid="02531cb5"/>
    </style:style>
    <style:style style:name="P18" style:family="paragraph" style:parent-style-name="Standard">
      <style:text-properties officeooo:paragraph-rsid="0267d0a3"/>
    </style:style>
    <style:style style:name="P19" style:family="paragraph" style:parent-style-name="Standard" style:list-style-name="L2">
      <style:text-properties style:font-name="Liberation Sans" fo:font-weight="normal" officeooo:rsid="01016bb0" officeooo:paragraph-rsid="01016bb0" style:font-weight-asian="normal" style:font-name-complex="Liberation Sans" style:font-weight-complex="normal"/>
    </style:style>
    <style:style style:name="P20" style:family="paragraph" style:parent-style-name="Standard" style:list-style-name="L2">
      <style:text-properties style:font-name="Liberation Sans" officeooo:rsid="01016bb0" officeooo:paragraph-rsid="01016bb0" style:font-name-complex="Liberation Sans"/>
    </style:style>
    <style:style style:name="P21" style:family="paragraph" style:parent-style-name="Standard" style:list-style-name="L2">
      <style:text-properties style:font-name="Liberation Sans" officeooo:rsid="010689fc" officeooo:paragraph-rsid="010689fc" style:font-name-complex="Liberation Sans"/>
    </style:style>
    <style:style style:name="P22" style:family="paragraph" style:parent-style-name="Standard">
      <style:text-properties officeooo:rsid="0073ce4b" officeooo:paragraph-rsid="0073ce4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75c24d" officeooo:paragraph-rsid="0075c24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26ef122" officeooo:paragraph-rsid="026ef122"/>
    </style:style>
    <style:style style:name="P25" style:family="paragraph" style:parent-style-name="Table_20_Contents">
      <style:text-properties officeooo:rsid="0075c24d" officeooo:paragraph-rsid="00bfdb51"/>
    </style:style>
    <style:style style:name="P26" style:family="paragraph" style:parent-style-name="Table_20_Contents">
      <style:text-properties officeooo:rsid="0075c24d" officeooo:paragraph-rsid="026e7336"/>
    </style:style>
    <style:style style:name="P27" style:family="paragraph" style:parent-style-name="Table_20_Contents">
      <style:text-properties officeooo:rsid="0075fa1a" officeooo:paragraph-rsid="00bfdb51"/>
    </style:style>
    <style:style style:name="P28" style:family="paragraph" style:parent-style-name="Table_20_Contents">
      <style:paragraph-properties fo:text-align="center" style:justify-single-word="false"/>
      <style:text-properties officeooo:rsid="0270278b" officeooo:paragraph-rsid="0270278b"/>
    </style:style>
    <style:style style:name="P29" style:family="paragraph" style:parent-style-name="Table_20_Contents">
      <style:text-properties officeooo:rsid="0076ba96" officeooo:paragraph-rsid="00bfdb51"/>
    </style:style>
    <style:style style:name="P30" style:family="paragraph" style:parent-style-name="Table_20_Contents">
      <style:text-properties officeooo:rsid="00771f94" officeooo:paragraph-rsid="00bfdb51"/>
    </style:style>
    <style:style style:name="P31" style:family="paragraph" style:parent-style-name="Table_20_Contents">
      <style:text-properties officeooo:rsid="007763b5" officeooo:paragraph-rsid="00bfdb51"/>
    </style:style>
    <style:style style:name="P32" style:family="paragraph" style:parent-style-name="Standard">
      <style:paragraph-properties fo:text-align="center" style:justify-single-word="false"/>
      <style:text-properties officeooo:paragraph-rsid="00bdf185"/>
    </style:style>
    <style:style style:name="P33" style:family="paragraph" style:parent-style-name="Standard">
      <style:paragraph-properties fo:text-align="center" style:justify-single-word="false"/>
      <style:text-properties style:font-name="Gabriela" officeooo:rsid="02e99e3e" officeooo:paragraph-rsid="02e99e3e"/>
    </style:style>
    <style:style style:name="P34" style:family="paragraph" style:parent-style-name="Standard">
      <style:text-properties officeooo:rsid="001e4fb3" officeooo:paragraph-rsid="00bdf185"/>
    </style:style>
    <style:style style:name="P35" style:family="paragraph" style:parent-style-name="Table_20_Contents">
      <style:text-properties officeooo:paragraph-rsid="00bdf185"/>
    </style:style>
    <style:style style:name="P36" style:family="paragraph" style:parent-style-name="Standard" style:list-style-name="L3">
      <style:text-properties officeooo:rsid="005a1ec0" officeooo:paragraph-rsid="00bdf185"/>
    </style:style>
    <style:style style:name="P37" style:family="paragraph" style:parent-style-name="Standard" style:list-style-name="L3">
      <style:text-properties officeooo:rsid="005a1ec0" officeooo:paragraph-rsid="027e36ba"/>
    </style:style>
    <style:style style:name="P38" style:family="paragraph" style:parent-style-name="Standard" style:list-style-name="L3">
      <style:text-properties officeooo:rsid="027acd3c" officeooo:paragraph-rsid="027acd3c"/>
    </style:style>
    <style:style style:name="P39" style:family="paragraph" style:parent-style-name="Standard">
      <style:text-properties officeooo:rsid="00edbb1a" officeooo:paragraph-rsid="00bdf185"/>
    </style:style>
    <style:style style:name="P40" style:family="paragraph" style:parent-style-name="Standard">
      <style:paragraph-properties fo:text-align="center" style:justify-single-word="false"/>
      <style:text-properties style:font-name="Gabriela" officeooo:rsid="02e7b2cd" officeooo:paragraph-rsid="02e7b2cd"/>
    </style:style>
    <style:style style:name="P41" style:family="paragraph" style:parent-style-name="Standard">
      <style:text-properties officeooo:rsid="00edbb1a" officeooo:paragraph-rsid="00edbb1a"/>
    </style:style>
    <style:style style:name="P42" style:family="paragraph" style:parent-style-name="Standard">
      <style:text-properties officeooo:rsid="00d0e242" officeooo:paragraph-rsid="00d0e242"/>
    </style:style>
    <style:style style:name="P43" style:family="paragraph" style:parent-style-name="Standard" style:list-style-name="L4">
      <style:text-properties fo:font-weight="bold" officeooo:rsid="00d0e242" officeooo:paragraph-rsid="00d0e242" style:font-weight-asian="bold" style:font-weight-complex="bold"/>
    </style:style>
    <style:style style:name="P44" style:family="paragraph" style:parent-style-name="Standard" style:list-style-name="L4">
      <style:text-properties officeooo:rsid="00d0e242" officeooo:paragraph-rsid="00d0e242"/>
    </style:style>
    <style:style style:name="P45" style:family="paragraph" style:parent-style-name="Standard" style:list-style-name="L4">
      <style:text-properties fo:font-weight="bold" officeooo:rsid="00d4ce80" officeooo:paragraph-rsid="00d4ce80" style:font-weight-asian="bold" style:font-weight-complex="bold"/>
    </style:style>
    <style:style style:name="P46" style:family="paragraph" style:parent-style-name="Standard" style:list-style-name="L4">
      <style:text-properties officeooo:rsid="00d368f4" officeooo:paragraph-rsid="00d4ce80"/>
    </style:style>
    <style:style style:name="P47" style:family="paragraph" style:parent-style-name="Standard" style:list-style-name="L4">
      <style:text-properties officeooo:rsid="00d9f18c" officeooo:paragraph-rsid="00d9f18c"/>
    </style:style>
    <style:style style:name="P48" style:family="paragraph" style:parent-style-name="Standard" style:list-style-name="L4">
      <style:text-properties officeooo:rsid="0251cbdf" officeooo:paragraph-rsid="0251cbdf"/>
    </style:style>
    <style:style style:name="P49" style:family="paragraph" style:parent-style-name="Standard" style:list-style-name="L4">
      <style:text-properties fo:font-weight="bold" officeooo:rsid="00df5fb6" officeooo:paragraph-rsid="00df5fb6" style:font-weight-asian="bold" style:font-weight-complex="bold"/>
    </style:style>
    <style:style style:name="P50" style:family="paragraph" style:parent-style-name="Standard" style:list-style-name="L4">
      <style:text-properties officeooo:rsid="00e103c5" officeooo:paragraph-rsid="00e103c5"/>
    </style:style>
    <style:style style:name="P51" style:family="paragraph" style:parent-style-name="Standard" style:list-style-name="L4">
      <style:text-properties officeooo:rsid="00e5cf20" officeooo:paragraph-rsid="00e5cf20"/>
    </style:style>
    <style:style style:name="P52" style:family="paragraph" style:parent-style-name="Standard">
      <style:text-properties officeooo:paragraph-rsid="001e4fb3"/>
    </style:style>
    <style:style style:name="P53" style:family="paragraph" style:parent-style-name="Standard">
      <style:paragraph-properties fo:text-align="center" style:justify-single-word="false"/>
      <style:text-properties style:font-name="Gabriela" officeooo:rsid="02e3c91d" officeooo:paragraph-rsid="02e4d43f"/>
    </style:style>
    <style:style style:name="P54" style:family="paragraph" style:parent-style-name="Standard">
      <style:paragraph-properties fo:text-align="left" style:justify-single-word="false"/>
      <style:text-properties officeooo:rsid="01362395" officeooo:paragraph-rsid="01362395"/>
    </style:style>
    <style:style style:name="P55" style:family="paragraph" style:parent-style-name="Standard">
      <style:text-properties officeooo:paragraph-rsid="01345322"/>
    </style:style>
    <style:style style:name="P56" style:family="paragraph" style:parent-style-name="Standard">
      <style:text-properties officeooo:rsid="01345322" officeooo:paragraph-rsid="01345322"/>
    </style:style>
    <style:style style:name="P57" style:family="paragraph" style:parent-style-name="Standard">
      <style:paragraph-properties fo:text-align="center" style:justify-single-word="false"/>
      <style:text-properties officeooo:paragraph-rsid="02e4d43f"/>
    </style:style>
    <style:style style:name="P58" style:family="paragraph" style:parent-style-name="Table_20_Contents">
      <style:text-properties officeooo:paragraph-rsid="008b7b43"/>
    </style:style>
    <style:style style:name="P59" style:family="paragraph" style:parent-style-name="Table_20_Contents">
      <style:text-properties fo:color="#127622" loext:opacity="100%" officeooo:paragraph-rsid="008b7b43"/>
    </style:style>
    <style:style style:name="P60" style:family="paragraph" style:parent-style-name="Standard" style:list-style-name="L5">
      <style:text-properties officeooo:paragraph-rsid="007d2d1e"/>
    </style:style>
    <style:style style:name="P61" style:family="paragraph" style:parent-style-name="Standard">
      <style:text-properties officeooo:rsid="00811750" officeooo:paragraph-rsid="00811750"/>
    </style:style>
    <style:style style:name="P62" style:family="paragraph" style:parent-style-name="Table_20_Contents">
      <style:text-properties fo:color="#127622" loext:opacity="100%" officeooo:paragraph-rsid="02b3e70e"/>
    </style:style>
    <style:style style:name="P63" style:family="paragraph" style:parent-style-name="Table_20_Contents">
      <style:text-properties officeooo:paragraph-rsid="02b3e70e"/>
    </style:style>
    <style:style style:name="P64" style:family="paragraph" style:parent-style-name="Standard" style:list-style-name="L6">
      <style:text-properties officeooo:rsid="02b62065" officeooo:paragraph-rsid="02b62065"/>
    </style:style>
    <style:style style:name="P65" style:family="paragraph" style:parent-style-name="Standard" style:list-style-name="L7">
      <style:text-properties officeooo:rsid="02a888c2" officeooo:paragraph-rsid="02a888c2"/>
    </style:style>
    <style:style style:name="P66" style:family="paragraph" style:parent-style-name="Table_20_Contents">
      <style:text-properties officeooo:paragraph-rsid="0097f9ef"/>
    </style:style>
    <style:style style:name="P67" style:family="paragraph" style:parent-style-name="Standard" style:list-style-name="L8">
      <style:text-properties officeooo:rsid="02b7ec73" officeooo:paragraph-rsid="02b7ec73"/>
    </style:style>
    <style:style style:name="P68" style:family="paragraph" style:parent-style-name="Standard" style:list-style-name="L8">
      <style:text-properties officeooo:rsid="02b07fb6" officeooo:paragraph-rsid="02b07fb6"/>
    </style:style>
    <style:style style:name="P69" style:family="paragraph" style:parent-style-name="Standard" style:list-style-name="L8">
      <style:text-properties officeooo:rsid="02b1df70" officeooo:paragraph-rsid="02b1df70"/>
    </style:style>
    <style:style style:name="P70" style:family="paragraph" style:parent-style-name="Standard">
      <style:paragraph-properties fo:text-align="center" style:justify-single-word="false"/>
      <style:text-properties officeooo:rsid="02e550dc" officeooo:paragraph-rsid="02e550dc"/>
    </style:style>
    <style:style style:name="P71" style:family="paragraph" style:parent-style-name="Standard" style:list-style-name="L9">
      <style:text-properties fo:font-weight="normal" officeooo:rsid="02d297f3" officeooo:paragraph-rsid="02d297f3" style:font-weight-asian="normal" style:font-weight-complex="normal"/>
    </style:style>
    <style:style style:name="P72" style:family="paragraph" style:parent-style-name="Standard" style:list-style-name="L9">
      <style:text-properties fo:font-weight="normal" officeooo:rsid="02d3fe0d" officeooo:paragraph-rsid="02dc0887" style:font-weight-asian="normal" style:font-weight-complex="normal"/>
    </style:style>
    <style:style style:name="P73" style:family="paragraph" style:parent-style-name="Standard" style:list-style-name="L9">
      <style:text-properties fo:font-weight="normal" officeooo:rsid="02dd181b" officeooo:paragraph-rsid="02dd181b" style:font-weight-asian="normal" style:font-weight-complex="normal"/>
    </style:style>
    <style:style style:name="P74" style:family="paragraph" style:parent-style-name="Standard" style:list-style-name="L9">
      <style:text-properties fo:font-weight="normal" officeooo:rsid="02f1e135" officeooo:paragraph-rsid="02f1e135" style:font-weight-asian="normal" style:font-weight-complex="normal"/>
    </style:style>
    <style:style style:name="P75" style:family="paragraph" style:parent-style-name="Standard" style:list-style-name="L9">
      <style:text-properties fo:font-weight="normal" officeooo:rsid="005f786b" officeooo:paragraph-rsid="016fad37" style:font-weight-asian="normal" style:font-weight-complex="normal"/>
    </style:style>
    <style:style style:name="P76" style:family="paragraph" style:parent-style-name="Standard">
      <style:text-properties fo:font-weight="normal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Gabriela" officeooo:rsid="02fe8c24" officeooo:paragraph-rsid="02fe8c24"/>
    </style:style>
    <style:style style:name="P78" style:family="paragraph" style:parent-style-name="Standard">
      <style:text-properties fo:font-weight="normal" officeooo:paragraph-rsid="02f82c3b" style:font-weight-asian="normal" style:font-weight-complex="normal"/>
    </style:style>
    <style:style style:name="P79" style:family="paragraph" style:parent-style-name="Table_20_Contents">
      <style:text-properties officeooo:paragraph-rsid="02f5c73d"/>
    </style:style>
    <style:style style:name="P80" style:family="paragraph" style:parent-style-name="Standard" style:list-style-name="L10">
      <style:text-properties fo:font-weight="normal" officeooo:rsid="017f6566" officeooo:paragraph-rsid="02f5c73d" style:font-weight-asian="normal" style:font-weight-complex="normal"/>
    </style:style>
    <style:style style:name="P81" style:family="paragraph" style:parent-style-name="Standard" style:list-style-name="L10">
      <style:text-properties officeooo:paragraph-rsid="02f5c73d"/>
    </style:style>
    <style:style style:name="P82" style:family="paragraph" style:parent-style-name="Standard">
      <style:text-properties officeooo:paragraph-rsid="02f5c73d"/>
    </style:style>
    <style:style style:name="P83" style:family="paragraph" style:parent-style-name="Standard">
      <style:paragraph-properties fo:text-align="center" style:justify-single-word="false"/>
      <style:text-properties style:font-name="Gabriela" fo:font-weight="normal" officeooo:rsid="02eb6e78" officeooo:paragraph-rsid="02eb6e78" style:font-weight-asian="normal" style:font-weight-complex="normal"/>
    </style:style>
    <style:style style:name="P84" style:family="paragraph" style:parent-style-name="Standard">
      <style:text-properties fo:font-weight="normal" officeooo:rsid="004e1bac" style:font-weight-asian="normal" style:font-weight-complex="normal"/>
    </style:style>
    <style:style style:name="P85" style:family="paragraph" style:parent-style-name="Table_20_Contents">
      <style:text-properties officeooo:paragraph-rsid="02efda59"/>
    </style:style>
    <style:style style:name="P86" style:family="paragraph" style:parent-style-name="Table_20_Contents">
      <style:text-properties officeooo:paragraph-rsid="019958cb"/>
    </style:style>
    <style:style style:name="P87" style:family="paragraph" style:parent-style-name="Standard" style:list-style-name="L11">
      <style:text-properties officeooo:paragraph-rsid="037de463"/>
    </style:style>
    <style:style style:name="P88" style:family="paragraph" style:parent-style-name="Standard" style:list-style-name="L11">
      <style:text-properties fo:font-weight="normal" officeooo:rsid="019ac907" officeooo:paragraph-rsid="019db5fc" style:font-weight-asian="normal" style:font-weight-complex="normal"/>
    </style:style>
    <style:style style:name="P89" style:family="paragraph" style:parent-style-name="Standard">
      <style:text-properties fo:font-weight="normal" officeooo:rsid="019ac907" officeooo:paragraph-rsid="019db5fc" style:font-weight-asian="normal" style:font-weight-complex="normal"/>
    </style:style>
    <style:style style:name="P90" style:family="paragraph" style:parent-style-name="Standard">
      <style:text-properties fo:font-weight="normal" officeooo:rsid="004429a1" officeooo:paragraph-rsid="019958cb" style:font-weight-asian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19958cb"/>
    </style:style>
    <style:style style:name="P92" style:family="paragraph" style:parent-style-name="Standard">
      <style:text-properties officeooo:paragraph-rsid="019958cb"/>
    </style:style>
    <style:style style:name="P93" style:family="paragraph" style:parent-style-name="Table_20_Contents">
      <style:text-properties officeooo:paragraph-rsid="00623c10"/>
    </style:style>
    <style:style style:name="P94" style:family="paragraph" style:parent-style-name="Standard" style:list-style-name="L10">
      <style:text-properties fo:font-weight="normal" officeooo:rsid="0303c69d" officeooo:paragraph-rsid="033fd7dd" style:font-weight-asian="normal" style:font-weight-complex="normal"/>
    </style:style>
    <style:style style:name="P95" style:family="paragraph" style:parent-style-name="Standard" style:list-style-name="L10">
      <style:text-properties fo:font-weight="normal" officeooo:rsid="01b20b61" officeooo:paragraph-rsid="01b20b61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Gabriela" fo:font-weight="normal" officeooo:rsid="034893e8" officeooo:paragraph-rsid="034893e8" style:font-weight-asian="normal" style:font-weight-complex="normal"/>
    </style:style>
    <style:style style:name="P97" style:family="paragraph" style:parent-style-name="Standard" style:list-style-name="L12">
      <style:text-properties fo:font-weight="normal" officeooo:rsid="01b20b61" officeooo:paragraph-rsid="01b20b61" style:font-weight-asian="normal" style:font-weight-complex="normal"/>
    </style:style>
    <style:style style:name="P98" style:family="paragraph" style:parent-style-name="Standard" style:list-style-name="L12">
      <style:text-properties fo:font-weight="normal" officeooo:rsid="01b20b61" officeooo:paragraph-rsid="01bc4cd7" style:font-weight-asian="normal" style:font-weight-complex="normal"/>
    </style:style>
    <style:style style:name="P99" style:family="paragraph" style:parent-style-name="Standard">
      <style:text-properties fo:font-weight="normal" officeooo:rsid="031079f2" officeooo:paragraph-rsid="031079f2" style:font-weight-asian="normal" style:font-weight-complex="normal"/>
    </style:style>
    <style:style style:name="P100" style:family="paragraph" style:parent-style-name="Standard" style:list-style-name="L12">
      <style:text-properties fo:font-weight="normal" officeooo:rsid="0308882e" officeooo:paragraph-rsid="0308882e" style:font-weight-asian="normal" style:font-weight-complex="normal"/>
    </style:style>
    <style:style style:name="P101" style:family="paragraph" style:parent-style-name="Standard" style:list-style-name="L12">
      <style:text-properties fo:font-weight="normal" officeooo:rsid="0309896e" officeooo:paragraph-rsid="0309896e" style:font-weight-asian="normal" style:font-weight-complex="normal"/>
    </style:style>
    <style:style style:name="P102" style:family="paragraph" style:parent-style-name="Standard" style:list-style-name="L12">
      <style:text-properties fo:font-weight="normal" officeooo:rsid="030b8020" officeooo:paragraph-rsid="030b8020" style:font-weight-asian="normal" style:font-weight-complex="normal"/>
    </style:style>
    <style:style style:name="P103" style:family="paragraph" style:parent-style-name="Standard" style:list-style-name="L12">
      <style:text-properties fo:font-weight="normal" officeooo:rsid="030e5ae2" officeooo:paragraph-rsid="030e5ae2" style:font-weight-asian="normal" style:font-weight-complex="normal"/>
    </style:style>
    <style:style style:name="P104" style:family="paragraph" style:parent-style-name="Standard" style:list-style-name="L12">
      <style:text-properties fo:font-weight="normal" officeooo:rsid="030c83ff" officeooo:paragraph-rsid="0380e62b" style:font-weight-asian="normal" style:font-weight-complex="normal"/>
    </style:style>
    <style:style style:name="P105" style:family="paragraph" style:parent-style-name="Standard" style:list-style-name="L12">
      <style:text-properties fo:font-weight="normal" officeooo:rsid="0313fc6f" officeooo:paragraph-rsid="0313fc6f" style:font-weight-asian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officeooo:paragraph-rsid="01c1cc23"/>
    </style:style>
    <style:style style:name="P107" style:family="paragraph" style:parent-style-name="Standard">
      <style:text-properties fo:font-weight="normal" officeooo:rsid="004b4397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1c9c6d1" officeooo:paragraph-rsid="01c9c6d1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1ca3880" officeooo:paragraph-rsid="01ca3880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1dd44dd" officeooo:paragraph-rsid="0382ccfa" style:font-weight-asian="normal" style:font-weight-complex="normal"/>
    </style:style>
    <style:style style:name="P111" style:family="paragraph" style:parent-style-name="Standard">
      <style:text-properties fo:font-weight="normal" officeooo:rsid="004b4397" officeooo:paragraph-rsid="004b4397" style:font-weight-asian="normal" style:font-weight-complex="normal"/>
    </style:style>
    <style:style style:name="P112" style:family="paragraph" style:parent-style-name="Table_20_Contents">
      <style:text-properties officeooo:paragraph-rsid="01d45046"/>
    </style:style>
    <style:style style:name="P113" style:family="paragraph" style:parent-style-name="Standard" style:list-style-name="L14">
      <style:text-properties fo:font-weight="normal" officeooo:rsid="01cf0ff1" officeooo:paragraph-rsid="01cf0ff1" style:font-weight-asian="normal" style:font-weight-complex="normal"/>
    </style:style>
    <style:style style:name="P114" style:family="paragraph" style:parent-style-name="Standard">
      <style:text-properties fo:font-weight="normal" officeooo:rsid="01cf0ff1" officeooo:paragraph-rsid="01cf0ff1" style:font-weight-asian="normal" style:font-weight-complex="normal"/>
    </style:style>
    <style:style style:name="P115" style:family="paragraph" style:parent-style-name="Standard">
      <style:text-properties officeooo:paragraph-rsid="01e866cd"/>
    </style:style>
    <style:style style:name="P116" style:family="paragraph" style:parent-style-name="Standard">
      <style:text-properties fo:color="#127622" loext:opacity="100%" fo:font-weight="normal" officeooo:rsid="01cf0ff1" officeooo:paragraph-rsid="01e866cd" style:font-weight-asian="normal" style:font-weight-complex="normal"/>
    </style:style>
    <style:style style:name="P117" style:family="paragraph" style:parent-style-name="Standard">
      <style:text-properties fo:font-weight="normal" officeooo:rsid="01cf0ff1" officeooo:paragraph-rsid="01e866cd" style:font-weight-asian="normal" style:font-weight-complex="normal"/>
    </style:style>
    <style:style style:name="P118" style:family="paragraph" style:parent-style-name="Standard" style:list-style-name="L15">
      <style:text-properties officeooo:paragraph-rsid="0315be85"/>
    </style:style>
    <style:style style:name="P119" style:family="paragraph" style:parent-style-name="Standard">
      <style:text-properties officeooo:rsid="009f05ee" officeooo:paragraph-rsid="0213ba70"/>
    </style:style>
    <style:style style:name="P120" style:family="paragraph" style:parent-style-name="Standard">
      <style:paragraph-properties fo:text-align="center" style:justify-single-word="false"/>
      <style:text-properties officeooo:paragraph-rsid="01f05925"/>
    </style:style>
    <style:style style:name="P121" style:family="paragraph" style:parent-style-name="Standard">
      <style:text-properties fo:font-weight="normal" officeooo:rsid="01e4ebf9" officeooo:paragraph-rsid="01cf0ff1" style:font-weight-asian="normal" style:font-weight-complex="normal"/>
    </style:style>
    <style:style style:name="P122" style:family="paragraph" style:parent-style-name="Standard">
      <style:text-properties officeooo:paragraph-rsid="02477e34"/>
    </style:style>
    <style:style style:name="P123" style:family="paragraph" style:parent-style-name="Standard">
      <style:text-properties fo:font-weight="normal" officeooo:rsid="01f05925" officeooo:paragraph-rsid="02477e34" style:font-weight-asian="normal" style:font-weight-complex="normal"/>
    </style:style>
    <style:style style:name="P124" style:family="paragraph" style:parent-style-name="Standard">
      <style:paragraph-properties fo:text-align="left" style:justify-single-word="false"/>
      <style:text-properties officeooo:paragraph-rsid="0359da8e"/>
    </style:style>
    <style:style style:name="P125" style:family="paragraph" style:parent-style-name="Standard">
      <style:text-properties fo:font-weight="normal" officeooo:rsid="031bb1c5" officeooo:paragraph-rsid="031bb1c5" style:font-weight-asian="normal" style:font-weight-complex="normal"/>
    </style:style>
    <style:style style:name="P126" style:family="paragraph" style:parent-style-name="Standard">
      <style:text-properties fo:font-weight="normal" officeooo:rsid="01f05925" officeooo:paragraph-rsid="01f4bfa4" style:font-weight-asian="normal" style:font-weight-complex="normal"/>
    </style:style>
    <style:style style:name="P127" style:family="paragraph" style:parent-style-name="Standard">
      <style:text-properties fo:font-weight="normal" officeooo:rsid="01f5980e" officeooo:paragraph-rsid="032234f0" style:font-weight-asian="normal" style:font-weight-complex="normal"/>
    </style:style>
    <style:style style:name="P128" style:family="paragraph" style:parent-style-name="Standard">
      <style:text-properties fo:font-weight="normal" officeooo:rsid="01f5980e" officeooo:paragraph-rsid="01f5980e" style:font-weight-asian="normal" style:font-weight-complex="normal"/>
    </style:style>
    <style:style style:name="P129" style:family="paragraph" style:parent-style-name="Standard">
      <style:text-properties officeooo:rsid="01fac755" officeooo:paragraph-rsid="01ff7da7"/>
    </style:style>
    <style:style style:name="P130" style:family="paragraph" style:parent-style-name="Standard">
      <style:text-properties fo:font-weight="normal" officeooo:rsid="01fac755" officeooo:paragraph-rsid="01ff7da7" style:font-weight-asian="normal" style:font-weight-complex="normal"/>
    </style:style>
    <style:style style:name="P131" style:family="paragraph" style:parent-style-name="Standard">
      <style:text-properties fo:font-weight="normal" officeooo:rsid="024ad4f7" officeooo:paragraph-rsid="024ad4f7" style:font-weight-asian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weight="normal" officeooo:rsid="0364493b" officeooo:paragraph-rsid="0364493b" style:font-weight-asian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style="normal" fo:font-weight="normal" officeooo:rsid="038a0160" officeooo:paragraph-rsid="038a0160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left" style:justify-single-word="false"/>
      <style:text-properties fo:font-style="normal" fo:font-weight="normal" officeooo:rsid="035d83e8" officeooo:paragraph-rsid="0364493b" style:font-style-asian="normal" style:font-weight-asian="normal" style:font-style-complex="normal" style:font-weight-complex="normal"/>
    </style:style>
    <style:style style:name="P135" style:family="paragraph" style:parent-style-name="Table_20_Contents">
      <style:paragraph-properties fo:text-align="left" style:justify-single-word="false"/>
      <style:text-properties officeooo:paragraph-rsid="0364493b"/>
    </style:style>
    <style:style style:name="P136" style:family="paragraph" style:parent-style-name="Table_20_Contents">
      <style:paragraph-properties fo:text-align="left" style:justify-single-word="false"/>
      <style:text-properties officeooo:rsid="035d83e8" officeooo:paragraph-rsid="0364493b"/>
    </style:style>
    <style:style style:name="P137" style:family="paragraph" style:parent-style-name="Table_20_Contents">
      <style:paragraph-properties fo:text-align="left" style:justify-single-word="false" style:writing-mode="lr-tb" style:writing-mode-automatic="false"/>
      <style:text-properties officeooo:paragraph-rsid="0364493b"/>
    </style:style>
    <style:style style:name="P138" style:family="paragraph" style:parent-style-name="Table_20_Contents">
      <style:paragraph-properties fo:text-align="left" style:justify-single-word="false"/>
      <style:text-properties officeooo:rsid="0361bc19" officeooo:paragraph-rsid="0364493b"/>
    </style:style>
    <style:style style:name="P139" style:family="paragraph" style:parent-style-name="Standard" style:list-style-name="L16">
      <style:paragraph-properties fo:text-align="left" style:justify-single-word="false"/>
      <style:text-properties fo:font-style="normal" fo:font-weight="normal" officeooo:rsid="035e9133" officeooo:paragraph-rsid="0364493b" style:font-style-asian="normal" style:font-weight-asian="normal" style:font-style-complex="normal" style:font-weight-complex="normal"/>
    </style:style>
    <style:style style:name="P140" style:family="paragraph" style:parent-style-name="Standard" style:list-style-name="L16">
      <style:paragraph-properties fo:text-align="left" style:justify-single-word="false"/>
      <style:text-properties fo:font-style="normal" fo:font-weight="normal" officeooo:rsid="036b176a" officeooo:paragraph-rsid="036b176a" style:font-style-asian="normal" style:font-weight-asian="normal" style:font-style-complex="normal" style:font-weight-complex="normal"/>
    </style:style>
    <style:style style:name="P141" style:family="paragraph" style:parent-style-name="Standard" style:list-style-name="L16">
      <style:paragraph-properties fo:text-align="left" style:justify-single-word="false"/>
      <style:text-properties fo:font-style="normal" fo:font-weight="normal" officeooo:rsid="035f86b6" officeooo:paragraph-rsid="0364493b" style:font-style-asian="normal" style:font-weight-asian="normal" style:font-style-complex="normal" style:font-weight-complex="normal"/>
    </style:style>
    <style:style style:name="P142" style:family="paragraph" style:parent-style-name="Standard" style:list-style-name="L16">
      <style:paragraph-properties fo:text-align="left" style:justify-single-word="false"/>
      <style:text-properties fo:font-style="normal" fo:font-weight="normal" officeooo:rsid="0360a96d" officeooo:paragraph-rsid="0364493b" style:font-style-asian="normal" style:font-weight-asian="normal" style:font-style-complex="normal" style:font-weight-complex="normal"/>
    </style:style>
    <style:style style:name="P143" style:family="paragraph" style:parent-style-name="Standard" style:list-style-name="L16">
      <style:paragraph-properties fo:text-align="left" style:justify-single-word="false"/>
      <style:text-properties officeooo:paragraph-rsid="0364493b"/>
    </style:style>
    <style:style style:name="T1" style:family="text">
      <style:text-properties officeooo:rsid="007a6081"/>
    </style:style>
    <style:style style:name="T2" style:family="text">
      <style:text-properties fo:color="#127622" loext:opacity="100%" officeooo:rsid="007a6081"/>
    </style:style>
    <style:style style:name="T3" style:family="text">
      <style:text-properties officeooo:rsid="0262a29a"/>
    </style:style>
    <style:style style:name="T4" style:family="text">
      <style:text-properties officeooo:rsid="00726eb4"/>
    </style:style>
    <style:style style:name="T5" style:family="text">
      <style:text-properties fo:font-style="italic" officeooo:rsid="00726eb4" style:font-style-asian="italic" style:font-style-complex="italic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881952"/>
    </style:style>
    <style:style style:name="T8" style:family="text">
      <style:text-properties style:text-position="super 58%"/>
    </style:style>
    <style:style style:name="T9" style:family="text">
      <style:text-properties fo:color="#ff0000" loext:opacity="100%" style:font-name="Liberation Sans" officeooo:rsid="02531cb5" fo:background-color="transparent" loext:char-shading-value="0" style:font-name-complex="Liberation Sans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ff0000" loext:opacity="100%" officeooo:rsid="00f15ba7" fo:background-color="#ffff00" loext:char-shading-value="0"/>
    </style:style>
    <style:style style:name="T12" style:family="text">
      <style:text-properties fo:color="#ff0000" loext:opacity="100%" officeooo:rsid="02531cb5" fo:background-color="#ffff00" loext:char-shading-value="0"/>
    </style:style>
    <style:style style:name="T13" style:family="text">
      <style:text-properties style:text-position="super 58%" officeooo:rsid="00216ec6"/>
    </style:style>
    <style:style style:name="T14" style:family="text">
      <style:text-properties officeooo:rsid="00216ec6"/>
    </style:style>
    <style:style style:name="T15" style:family="text">
      <style:text-properties fo:background-color="#fff5ce" loext:char-shading-value="0"/>
    </style:style>
    <style:style style:name="T16" style:family="text">
      <style:text-properties style:text-position="super 58%" officeooo:rsid="0089de6e"/>
    </style:style>
    <style:style style:name="T17" style:family="text">
      <style:text-properties officeooo:rsid="0089de6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2bc270d"/>
    </style:style>
    <style:style style:name="T20" style:family="text">
      <style:text-properties fo:color="#127622" loext:opacity="100%" officeooo:rsid="02bc270d"/>
    </style:style>
    <style:style style:name="T21" style:family="text">
      <style:text-properties fo:font-style="italic" officeooo:rsid="02bc270d" style:font-style-asian="italic" style:font-style-complex="italic"/>
    </style:style>
    <style:style style:name="T22" style:family="text">
      <style:text-properties officeooo:rsid="02bdd022"/>
    </style:style>
    <style:style style:name="T23" style:family="text">
      <style:text-properties officeooo:rsid="0329452d"/>
    </style:style>
    <style:style style:name="T24" style:family="text">
      <style:text-properties officeooo:rsid="02c0a1e7"/>
    </style:style>
    <style:style style:name="T25" style:family="text">
      <style:text-properties officeooo:rsid="02c25377"/>
    </style:style>
    <style:style style:name="T26" style:family="text">
      <style:text-properties officeooo:rsid="02bdc9d9"/>
    </style:style>
    <style:style style:name="T27" style:family="text">
      <style:text-properties fo:color="#127622" loext:opacity="100%" fo:font-weight="bold" officeooo:rsid="02bdc9d9" style:font-weight-asian="bold" style:font-weight-complex="bold"/>
    </style:style>
    <style:style style:name="T28" style:family="text">
      <style:text-properties fo:color="#127622" loext:opacity="100%" fo:font-weight="bold" officeooo:rsid="03299703" style:font-weight-asian="bold" style:font-weight-complex="bold"/>
    </style:style>
    <style:style style:name="T29" style:family="text">
      <style:text-properties fo:color="#127622" loext:opacity="100%" officeooo:rsid="02bdd022"/>
    </style:style>
    <style:style style:name="T30" style:family="text">
      <style:text-properties fo:color="#127622" loext:opacity="100%" officeooo:rsid="03299703"/>
    </style:style>
    <style:style style:name="T31" style:family="text">
      <style:text-properties fo:color="#127622" loext:opacity="100%" officeooo:rsid="02bec18e"/>
    </style:style>
    <style:style style:name="T32" style:family="text">
      <style:text-properties fo:color="#127622" loext:opacity="100%" officeooo:rsid="032b1029"/>
    </style:style>
    <style:style style:name="T33" style:family="text">
      <style:text-properties officeooo:rsid="02531cb5"/>
    </style:style>
    <style:style style:name="T34" style:family="text">
      <style:text-properties officeooo:rsid="0254bde9"/>
    </style:style>
    <style:style style:name="T35" style:family="text">
      <style:text-properties officeooo:rsid="02550e62"/>
    </style:style>
    <style:style style:name="T36" style:family="text">
      <style:text-properties officeooo:rsid="0258dd0f"/>
    </style:style>
    <style:style style:name="T37" style:family="text">
      <style:text-properties officeooo:rsid="025bb8ea"/>
    </style:style>
    <style:style style:name="T38" style:family="text">
      <style:text-properties officeooo:rsid="025bc0ce"/>
    </style:style>
    <style:style style:name="T39" style:family="text">
      <style:text-properties officeooo:rsid="025d121b"/>
    </style:style>
    <style:style style:name="T40" style:family="text">
      <style:text-properties officeooo:rsid="02533d8d"/>
    </style:style>
    <style:style style:name="T41" style:family="text">
      <style:text-properties officeooo:rsid="025e6e80"/>
    </style:style>
    <style:style style:name="T42" style:family="text">
      <style:text-properties officeooo:rsid="025dc311"/>
    </style:style>
    <style:style style:name="T43" style:family="text">
      <style:text-properties fo:color="#ff0000" loext:opacity="100%" style:font-name="Liberation Sans" officeooo:rsid="00f15ba7" fo:background-color="transparent" loext:char-shading-value="0" style:font-name-complex="Liberation Sans"/>
    </style:style>
    <style:style style:name="T44" style:family="text">
      <style:text-properties style:use-window-font-color="true" loext:opacity="0%" style:font-name="Liberation Sans" officeooo:rsid="00f15ba7" style:font-name-complex="Liberation Sans"/>
    </style:style>
    <style:style style:name="T45" style:family="text">
      <style:text-properties style:use-window-font-color="true" loext:opacity="0%" style:font-name="Liberation Sans" fo:font-weight="normal" officeooo:rsid="00f15ba7" style:font-weight-asian="normal" style:font-name-complex="Liberation Sans" style:font-weight-complex="normal"/>
    </style:style>
    <style:style style:name="T46" style:family="text">
      <style:text-properties style:use-window-font-color="true" loext:opacity="0%" style:font-name="Liberation Sans" fo:font-weight="normal" officeooo:rsid="010494e0" style:font-weight-asian="normal" style:font-name-complex="Liberation Sans" style:font-weight-complex="normal"/>
    </style:style>
    <style:style style:name="T47" style:family="text">
      <style:text-properties style:use-window-font-color="true" loext:opacity="0%" style:font-name="Liberation Sans" fo:font-style="italic" fo:font-weight="normal" officeooo:rsid="00f15ba7" style:font-weight-asian="normal" style:font-name-complex="Liberation Sans" style:font-weight-complex="normal"/>
    </style:style>
    <style:style style:name="T48" style:family="text">
      <style:text-properties style:use-window-font-color="true" loext:opacity="0%" style:font-name="Liberation Sans" fo:font-weight="normal" officeooo:rsid="0109577a" style:font-weight-asian="normal" style:font-name-complex="Liberation Sans" style:font-weight-complex="normal"/>
    </style:style>
    <style:style style:name="T49" style:family="text">
      <style:text-properties style:use-window-font-color="true" loext:opacity="0%" style:font-name="Liberation Sans" fo:font-style="italic" fo:font-weight="normal" officeooo:rsid="00f15ba7" style:font-style-asian="italic" style:font-weight-asian="normal" style:font-name-complex="Liberation Sans" style:font-style-complex="italic" style:font-weight-complex="normal"/>
    </style:style>
    <style:style style:name="T50" style:family="text">
      <style:text-properties style:use-window-font-color="true" loext:opacity="0%" style:font-name="Liberation Sans" fo:font-weight="bold" officeooo:rsid="00f36691" style:font-weight-asian="bold" style:font-name-complex="Liberation Sans" style:font-weight-complex="bold"/>
    </style:style>
    <style:style style:name="T51" style:family="text">
      <style:text-properties style:use-window-font-color="true" loext:opacity="0%" style:font-name="Liberation Sans" fo:font-weight="normal" officeooo:rsid="0260dceb" style:font-weight-asian="normal" style:font-name-complex="Liberation Sans" style:font-weight-complex="normal"/>
    </style:style>
    <style:style style:name="T52" style:family="text">
      <style:text-properties style:use-window-font-color="true" loext:opacity="0%" style:font-name="Liberation Sans" fo:font-weight="normal" officeooo:rsid="00f1eebf" style:font-weight-asian="normal" style:font-name-complex="Liberation Sans" style:font-weight-complex="normal"/>
    </style:style>
    <style:style style:name="T53" style:family="text">
      <style:text-properties style:font-name="Liberation Sans" fo:font-weight="normal" style:font-weight-asian="normal" style:font-name-complex="Liberation Sans" style:font-weight-complex="normal"/>
    </style:style>
    <style:style style:name="T54" style:family="text">
      <style:text-properties style:font-name="Liberation Sans" fo:font-style="italic" fo:font-weight="normal" style:font-weight-asian="normal" style:font-name-complex="Liberation Sans" style:font-weight-complex="normal"/>
    </style:style>
    <style:style style:name="T55" style:family="text">
      <style:text-properties style:font-name="Liberation Sans" fo:font-weight="normal" officeooo:rsid="00f36691" style:font-weight-asian="normal" style:font-name-complex="Liberation Sans" style:font-weight-complex="normal"/>
    </style:style>
    <style:style style:name="T56" style:family="text">
      <style:text-properties style:font-name="Liberation Sans" fo:font-weight="normal" officeooo:rsid="00f47c70" style:font-weight-asian="normal" style:font-name-complex="Liberation Sans" style:font-weight-complex="normal"/>
    </style:style>
    <style:style style:name="T57" style:family="text">
      <style:text-properties style:font-name="Liberation Sans" fo:font-weight="normal" officeooo:rsid="01014ab9" style:font-weight-asian="normal" style:font-name-complex="Liberation Sans" style:font-weight-complex="normal"/>
    </style:style>
    <style:style style:name="T58" style:family="text">
      <style:text-properties style:font-name="Liberation Sans" fo:font-weight="normal" officeooo:rsid="00fe6127" style:font-weight-asian="normal" style:font-name-complex="Liberation Sans" style:font-weight-complex="normal"/>
    </style:style>
    <style:style style:name="T59" style:family="text">
      <style:text-properties style:font-name="Liberation Sans" fo:font-weight="normal" officeooo:rsid="01016bb0" style:font-weight-asian="normal" style:font-name-complex="Liberation Sans" style:font-weight-complex="normal"/>
    </style:style>
    <style:style style:name="T60" style:family="text">
      <style:text-properties style:font-name="Liberation Sans" fo:font-weight="normal" officeooo:rsid="01078e66" style:font-weight-asian="normal" style:font-name-complex="Liberation Sans" style:font-weight-complex="normal"/>
    </style:style>
    <style:style style:name="T61" style:family="text">
      <style:text-properties style:font-name="Liberation Sans" fo:font-style="italic" fo:font-weight="normal" officeooo:rsid="00fe6127" style:font-weight-asian="normal" style:font-name-complex="Liberation Sans" style:font-weight-complex="normal"/>
    </style:style>
    <style:style style:name="T62" style:family="text">
      <style:text-properties style:font-name="Liberation Sans" fo:font-style="normal" fo:font-weight="normal" officeooo:rsid="00fe6127" style:font-style-asian="normal" style:font-weight-asian="normal" style:font-name-complex="Liberation Sans" style:font-style-complex="normal" style:font-weight-complex="normal"/>
    </style:style>
    <style:style style:name="T63" style:family="text">
      <style:text-properties style:font-name="Liberation Sans" fo:font-style="normal" fo:font-weight="normal" officeooo:rsid="026abd19" style:font-style-asian="normal" style:font-weight-asian="normal" style:font-name-complex="Liberation Sans" style:font-style-complex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Liberation Sans" fo:font-weight="normal" officeooo:rsid="02672b90" style:font-weight-asian="normal" style:font-name-complex="Liberation Sans" style:font-weight-complex="normal"/>
    </style:style>
    <style:style style:name="T66" style:family="text">
      <style:text-properties style:font-name="Liberation Sans" fo:font-weight="normal" officeooo:rsid="0260deca" style:font-weight-asian="normal" style:font-name-complex="Liberation Sans" style:font-weight-complex="normal"/>
    </style:style>
    <style:style style:name="T67" style:family="text">
      <style:text-properties style:font-name="Liberation Sans" fo:font-weight="normal" officeooo:rsid="026c5551" style:font-weight-asian="normal" style:font-name-complex="Liberation Sans" style:font-weight-complex="normal"/>
    </style:style>
    <style:style style:name="T68" style:family="text">
      <style:text-properties officeooo:rsid="010939ef"/>
    </style:style>
    <style:style style:name="T69" style:family="text">
      <style:text-properties officeooo:rsid="010494e0"/>
    </style:style>
    <style:style style:name="T70" style:family="text">
      <style:text-properties officeooo:rsid="01025aa0"/>
    </style:style>
    <style:style style:name="T71" style:family="text">
      <style:text-properties officeooo:rsid="011397f4"/>
    </style:style>
    <style:style style:name="T72" style:family="text">
      <style:text-properties fo:font-style="italic" fo:font-weight="normal" style:font-weight-asian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10eade7" style:font-weight-asian="normal" style:font-weight-complex="normal"/>
    </style:style>
    <style:style style:name="T76" style:family="text">
      <style:text-properties fo:font-style="italic" officeooo:rsid="010eade7"/>
    </style:style>
    <style:style style:name="T77" style:family="text">
      <style:text-properties officeooo:rsid="010eade7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officeooo:rsid="0271a3e0"/>
    </style:style>
    <style:style style:name="T80" style:family="text">
      <style:text-properties officeooo:rsid="02737eb7"/>
    </style:style>
    <style:style style:name="T81" style:family="text">
      <style:text-properties officeooo:rsid="026d37ff"/>
    </style:style>
    <style:style style:name="T82" style:family="text">
      <style:text-properties officeooo:rsid="026e7336"/>
    </style:style>
    <style:style style:name="T83" style:family="text">
      <style:text-properties officeooo:rsid="02751746"/>
    </style:style>
    <style:style style:name="T84" style:family="text">
      <style:text-properties officeooo:rsid="02763f29"/>
    </style:style>
    <style:style style:name="T85" style:family="text">
      <style:text-properties officeooo:rsid="0076ba96"/>
    </style:style>
    <style:style style:name="T86" style:family="text">
      <style:text-properties officeooo:rsid="00771f94"/>
    </style:style>
    <style:style style:name="T87" style:family="text">
      <style:text-properties officeooo:rsid="007763b5"/>
    </style:style>
    <style:style style:name="T88" style:family="text">
      <style:text-properties officeooo:rsid="02fd8d94"/>
    </style:style>
    <style:style style:name="T89" style:family="text">
      <style:text-properties style:use-window-font-color="true" loext:opacity="0%" fo:background-color="#ffdbb6" loext:char-shading-value="0"/>
    </style:style>
    <style:style style:name="T90" style:family="text">
      <style:text-properties fo:color="#127622" loext:opacity="100%" officeooo:rsid="00524793"/>
    </style:style>
    <style:style style:name="T91" style:family="text">
      <style:text-properties fo:background-color="#ffdbb6" loext:char-shading-value="0"/>
    </style:style>
    <style:style style:name="T92" style:family="text">
      <style:text-properties fo:background-color="#dee6ef" loext:char-shading-value="0"/>
    </style:style>
    <style:style style:name="T93" style:family="text">
      <style:text-properties fo:font-weight="bold" fo:background-color="#dee6ef" loext:char-shading-value="0" style:font-weight-asian="bold" style:font-weight-complex="bold"/>
    </style:style>
    <style:style style:name="T94" style:family="text">
      <style:text-properties officeooo:rsid="01188120"/>
    </style:style>
    <style:style style:name="T95" style:family="text">
      <style:text-properties officeooo:rsid="00c321b7"/>
    </style:style>
    <style:style style:name="T96" style:family="text">
      <style:text-properties officeooo:rsid="005b120f"/>
    </style:style>
    <style:style style:name="T97" style:family="text">
      <style:text-properties officeooo:rsid="0067473c"/>
    </style:style>
    <style:style style:name="T98" style:family="text">
      <style:text-properties officeooo:rsid="00c4e097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officeooo:rsid="01161953"/>
    </style:style>
    <style:style style:name="T101" style:family="text">
      <style:text-properties fo:font-style="italic" officeooo:rsid="01161953" style:font-style-asian="italic" style:font-style-complex="italic"/>
    </style:style>
    <style:style style:name="T102" style:family="text">
      <style:text-properties fo:font-style="normal" officeooo:rsid="01161953" style:font-style-asian="normal" style:font-style-complex="normal"/>
    </style:style>
    <style:style style:name="T103" style:family="text">
      <style:text-properties fo:font-style="normal" officeooo:rsid="02810f1b" style:font-style-asian="normal" style:font-style-complex="normal"/>
    </style:style>
    <style:style style:name="T104" style:family="text">
      <style:text-properties fo:color="#127622" loext:opacity="100%" officeooo:rsid="01173aca"/>
    </style:style>
    <style:style style:name="T105" style:family="text">
      <style:text-properties fo:color="#127622" loext:opacity="100%" officeooo:rsid="0332e5d8"/>
    </style:style>
    <style:style style:name="T106" style:family="text">
      <style:text-properties fo:font-style="italic" officeooo:rsid="027d45d6" style:font-style-asian="italic" style:font-style-complex="italic"/>
    </style:style>
    <style:style style:name="T107" style:family="text">
      <style:text-properties fo:font-style="normal" officeooo:rsid="027d45d6" style:font-style-asian="normal" style:font-style-complex="normal"/>
    </style:style>
    <style:style style:name="T108" style:family="text">
      <style:text-properties officeooo:rsid="0281d3a5"/>
    </style:style>
    <style:style style:name="T109" style:family="text">
      <style:text-properties fo:color="#127622" loext:opacity="100%" officeooo:rsid="027c297c"/>
    </style:style>
    <style:style style:name="T110" style:family="text">
      <style:text-properties officeooo:rsid="027c297c"/>
    </style:style>
    <style:style style:name="T111" style:family="text">
      <style:text-properties officeooo:rsid="011dbf24"/>
    </style:style>
    <style:style style:name="T112" style:family="text">
      <style:text-properties officeooo:rsid="011f659e"/>
    </style:style>
    <style:style style:name="T113" style:family="text">
      <style:text-properties officeooo:rsid="012551cf"/>
    </style:style>
    <style:style style:name="T114" style:family="text">
      <style:text-properties fo:color="#127622" loext:opacity="100%" officeooo:rsid="0333a311"/>
    </style:style>
    <style:style style:name="T115" style:family="text">
      <style:text-properties officeooo:rsid="00d13cc4"/>
    </style:style>
    <style:style style:name="T116" style:family="text">
      <style:text-properties fo:color="#127622" loext:opacity="100%" officeooo:rsid="00d13cc4"/>
    </style:style>
    <style:style style:name="T117" style:family="text">
      <style:text-properties officeooo:rsid="00d03cc8"/>
    </style:style>
    <style:style style:name="T118" style:family="text">
      <style:text-properties fo:font-weight="bold" officeooo:rsid="00f12210" style:font-weight-asian="bold" style:font-weight-complex="bold"/>
    </style:style>
    <style:style style:name="T119" style:family="text">
      <style:text-properties officeooo:rsid="00f12210"/>
    </style:style>
    <style:style style:name="T120" style:family="text">
      <style:text-properties officeooo:rsid="00f5909b"/>
    </style:style>
    <style:style style:name="T121" style:family="text">
      <style:text-properties officeooo:rsid="00f5ae46"/>
    </style:style>
    <style:style style:name="T122" style:family="text">
      <style:text-properties fo:font-weight="bold" officeooo:rsid="00d03cc8" style:font-weight-asian="bold" style:font-weight-complex="bold"/>
    </style:style>
    <style:style style:name="T123" style:family="text">
      <style:text-properties officeooo:rsid="00d07b6c"/>
    </style:style>
    <style:style style:name="T124" style:family="text">
      <style:text-properties officeooo:rsid="03349d9a"/>
    </style:style>
    <style:style style:name="T125" style:family="text">
      <style:text-properties officeooo:rsid="01263296"/>
    </style:style>
    <style:style style:name="T126" style:family="text">
      <style:text-properties officeooo:rsid="00d84c60"/>
    </style:style>
    <style:style style:name="T127" style:family="text">
      <style:text-properties officeooo:rsid="00d66869"/>
    </style:style>
    <style:style style:name="T128" style:family="text">
      <style:text-properties officeooo:rsid="00d3bcb9"/>
    </style:style>
    <style:style style:name="T129" style:family="text">
      <style:text-properties officeooo:rsid="00eb50c3"/>
    </style:style>
    <style:style style:name="T130" style:family="text">
      <style:text-properties officeooo:rsid="028dfc91"/>
    </style:style>
    <style:style style:name="T131" style:family="text">
      <style:text-properties officeooo:rsid="00ecdb46"/>
    </style:style>
    <style:style style:name="T132" style:family="text">
      <style:text-properties officeooo:rsid="00db6cd0"/>
    </style:style>
    <style:style style:name="T133" style:family="text">
      <style:text-properties officeooo:rsid="00dca3fc"/>
    </style:style>
    <style:style style:name="T134" style:family="text">
      <style:text-properties officeooo:rsid="00de6e23"/>
    </style:style>
    <style:style style:name="T135" style:family="text">
      <style:text-properties officeooo:rsid="028ff9b1"/>
    </style:style>
    <style:style style:name="T136" style:family="text">
      <style:text-properties officeooo:rsid="00e252df"/>
    </style:style>
    <style:style style:name="T137" style:family="text">
      <style:text-properties officeooo:rsid="0126d288"/>
    </style:style>
    <style:style style:name="T138" style:family="text">
      <style:text-properties officeooo:rsid="00f8d6b4"/>
    </style:style>
    <style:style style:name="T139" style:family="text">
      <style:text-properties officeooo:rsid="02902f5e"/>
    </style:style>
    <style:style style:name="T140" style:family="text">
      <style:text-properties fo:color="#127622" loext:opacity="100%" officeooo:rsid="00e252df"/>
    </style:style>
    <style:style style:name="T141" style:family="text">
      <style:text-properties officeooo:rsid="0251cbdf"/>
    </style:style>
    <style:style style:name="T142" style:family="text">
      <style:text-properties officeooo:rsid="00facfc6"/>
    </style:style>
    <style:style style:name="T143" style:family="text">
      <style:text-properties officeooo:rsid="00e81759"/>
    </style:style>
    <style:style style:name="T144" style:family="text">
      <style:text-properties officeooo:rsid="00e9bfe2"/>
    </style:style>
    <style:style style:name="T145" style:family="text">
      <style:text-properties officeooo:rsid="015f989a"/>
    </style:style>
    <style:style style:name="T146" style:family="text">
      <style:text-properties officeooo:rsid="02e4d43f"/>
    </style:style>
    <style:style style:name="T147" style:family="text">
      <style:text-properties officeooo:rsid="0127765b"/>
    </style:style>
    <style:style style:name="T148" style:family="text">
      <style:text-properties officeooo:rsid="01343a48"/>
    </style:style>
    <style:style style:name="T149" style:family="text">
      <style:text-properties officeooo:rsid="0138d77f"/>
    </style:style>
    <style:style style:name="T150" style:family="text">
      <style:text-properties officeooo:rsid="0127a58c"/>
    </style:style>
    <style:style style:name="T151" style:family="text">
      <style:text-properties officeooo:rsid="029596a5"/>
    </style:style>
    <style:style style:name="T152" style:family="text">
      <style:text-properties officeooo:rsid="03742a4a"/>
    </style:style>
    <style:style style:name="T153" style:family="text">
      <style:text-properties fo:color="#127622" loext:opacity="100%" officeooo:rsid="0127765b"/>
    </style:style>
    <style:style style:name="T154" style:family="text">
      <style:text-properties fo:color="#127622" loext:opacity="100%" officeooo:rsid="03368c35"/>
    </style:style>
    <style:style style:name="T155" style:family="text">
      <style:text-properties officeooo:rsid="0129b456"/>
    </style:style>
    <style:style style:name="T156" style:family="text">
      <style:text-properties officeooo:rsid="0128a456"/>
    </style:style>
    <style:style style:name="T157" style:family="text">
      <style:text-properties officeooo:rsid="012a5621"/>
    </style:style>
    <style:style style:name="T158" style:family="text">
      <style:text-properties fo:color="#127622" loext:opacity="100%" officeooo:rsid="012a852a"/>
    </style:style>
    <style:style style:name="T159" style:family="text">
      <style:text-properties fo:color="#127622" loext:opacity="100%" officeooo:rsid="0337494b"/>
    </style:style>
    <style:style style:name="T160" style:family="text">
      <style:text-properties officeooo:rsid="012a852a"/>
    </style:style>
    <style:style style:name="T161" style:family="text">
      <style:text-properties fo:color="#127622" loext:opacity="100%" officeooo:rsid="012b006c"/>
    </style:style>
    <style:style style:name="T162" style:family="text">
      <style:text-properties officeooo:rsid="012b006c"/>
    </style:style>
    <style:style style:name="T163" style:family="text">
      <style:text-properties fo:color="#127622" loext:opacity="100%" officeooo:rsid="012c7dfe"/>
    </style:style>
    <style:style style:name="T164" style:family="text">
      <style:text-properties fo:color="#127622" loext:opacity="100%" officeooo:rsid="012de272"/>
    </style:style>
    <style:style style:name="T165" style:family="text">
      <style:text-properties officeooo:rsid="012de272"/>
    </style:style>
    <style:style style:name="T166" style:family="text">
      <style:text-properties fo:color="#127622" loext:opacity="100%" officeooo:rsid="012fa2f7"/>
    </style:style>
    <style:style style:name="T167" style:family="text">
      <style:text-properties officeooo:rsid="0138d52c"/>
    </style:style>
    <style:style style:name="T168" style:family="text">
      <style:text-properties officeooo:rsid="0134e6da"/>
    </style:style>
    <style:style style:name="T169" style:family="text">
      <style:text-properties style:font-name="Gabriela" officeooo:rsid="02e4d43f"/>
    </style:style>
    <style:style style:name="T170" style:family="text">
      <style:text-properties style:font-name="Gabriela" officeooo:rsid="02fbea4e"/>
    </style:style>
    <style:style style:name="T171" style:family="text">
      <style:text-properties fo:font-weight="bold" fo:background-color="#ffff00" loext:char-shading-value="0" style:font-weight-asian="bold" style:font-weight-complex="bold"/>
    </style:style>
    <style:style style:name="T172" style:family="text">
      <style:text-properties officeooo:rsid="00811750"/>
    </style:style>
    <style:style style:name="T173" style:family="text">
      <style:text-properties officeooo:rsid="007d2d1e"/>
    </style:style>
    <style:style style:name="T174" style:family="text">
      <style:text-properties style:text-underline-style="none" officeooo:rsid="00811750"/>
    </style:style>
    <style:style style:name="T175" style:family="text">
      <style:text-properties officeooo:rsid="013d206b"/>
    </style:style>
    <style:style style:name="T176" style:family="text">
      <style:text-properties fo:color="#ff0000" loext:opacity="100%" fo:background-color="#ffff00" loext:char-shading-value="0"/>
    </style:style>
    <style:style style:name="T177" style:family="text">
      <style:text-properties fo:color="#ff0000" loext:opacity="100%"/>
    </style:style>
    <style:style style:name="T178" style:family="text">
      <style:text-properties fo:color="#127622" loext:opacity="100%" officeooo:rsid="02b3e70e"/>
    </style:style>
    <style:style style:name="T179" style:family="text">
      <style:text-properties fo:color="#127622" loext:opacity="100%" officeooo:rsid="0375f56a"/>
    </style:style>
    <style:style style:name="T180" style:family="text">
      <style:text-properties fo:color="#127622" loext:opacity="100%" officeooo:rsid="02b4ec53"/>
    </style:style>
    <style:style style:name="T181" style:family="text">
      <style:text-properties fo:color="#127622" loext:opacity="100%" officeooo:rsid="00bc11bb"/>
    </style:style>
    <style:style style:name="T182" style:family="text">
      <style:text-properties fo:color="#127622" loext:opacity="100%" officeooo:rsid="02ac5e64"/>
    </style:style>
    <style:style style:name="T183" style:family="text">
      <style:text-properties fo:color="#127622" loext:opacity="100%" officeooo:rsid="02ad1533"/>
    </style:style>
    <style:style style:name="T184" style:family="text">
      <style:text-properties fo:font-style="italic" officeooo:rsid="02ae6fee" style:font-style-asian="italic" style:font-style-complex="italic"/>
    </style:style>
    <style:style style:name="T185" style:family="text">
      <style:text-properties officeooo:rsid="02ae6fee"/>
    </style:style>
    <style:style style:name="T186" style:family="text">
      <style:text-properties fo:color="#127622" loext:opacity="100%" officeooo:rsid="0097f9ef"/>
    </style:style>
    <style:style style:name="T187" style:family="text">
      <style:text-properties fo:color="#127622" loext:opacity="100%" officeooo:rsid="0081dbd5"/>
    </style:style>
    <style:style style:name="T188" style:family="text">
      <style:text-properties fo:color="#127622" loext:opacity="100%" officeooo:rsid="00811750"/>
    </style:style>
    <style:style style:name="T189" style:family="text">
      <style:text-properties fo:color="#127622" loext:opacity="100%" officeooo:rsid="00998d0f"/>
    </style:style>
    <style:style style:name="T190" style:family="text">
      <style:text-properties style:use-window-font-color="true" loext:opacity="0%" style:text-position="super 58%" fo:font-weight="normal" officeooo:rsid="0097f9ef" fo:background-color="transparent" loext:char-shading-value="0" style:font-weight-asian="normal" style:font-weight-complex="normal"/>
    </style:style>
    <style:style style:name="T191" style:family="text">
      <style:text-properties style:use-window-font-color="true" loext:opacity="0%" fo:font-weight="normal" officeooo:rsid="0097f9ef" fo:background-color="transparent" loext:char-shading-value="0" style:font-weight-asian="normal" style:font-weight-complex="normal"/>
    </style:style>
    <style:style style:name="T192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93" style:family="text">
      <style:text-properties fo:color="#127622" loext:opacity="100%" style:text-position="super 58%" fo:font-weight="normal" officeooo:rsid="02ca4096" fo:background-color="transparent" loext:char-shading-value="0" style:font-weight-asian="normal" style:font-weight-complex="normal"/>
    </style:style>
    <style:style style:name="T194" style:family="text">
      <style:text-properties fo:color="#127622" loext:opacity="100%" style:text-position="super 58%" fo:font-weight="normal" officeooo:rsid="02a81aae" fo:background-color="transparent" loext:char-shading-value="0" style:font-weight-asian="normal" style:font-weight-complex="normal"/>
    </style:style>
    <style:style style:name="T195" style:family="text">
      <style:text-properties fo:color="#127622" loext:opacity="100%" style:text-position="super 58%" fo:font-weight="normal" officeooo:rsid="02cba03c" fo:background-color="transparent" loext:char-shading-value="0" style:font-weight-asian="normal" style:font-weight-complex="normal"/>
    </style:style>
    <style:style style:name="T196" style:family="text">
      <style:text-properties style:use-window-font-color="true" loext:opacity="0%" style:text-position="super 58%" fo:font-weight="normal" fo:background-color="transparent" loext:char-shading-value="0" style:font-weight-asian="normal" style:font-weight-complex="normal"/>
    </style:style>
    <style:style style:name="T197" style:family="text">
      <style:text-properties fo:color="#127622" loext:opacity="100%" style:text-position="super 58%" fo:font-weight="normal" officeooo:rsid="009b1a61" fo:background-color="transparent" loext:char-shading-value="0" style:font-weight-asian="normal" style:font-weight-complex="normal"/>
    </style:style>
    <style:style style:name="T198" style:family="text">
      <style:text-properties fo:color="#127622" loext:opacity="100%" style:text-position="super 58%" fo:font-weight="normal" officeooo:rsid="009bc2ea" fo:background-color="transparent" loext:char-shading-value="0" style:font-weight-asian="normal" style:font-weight-complex="normal"/>
    </style:style>
    <style:style style:name="T199" style:family="text">
      <style:text-properties fo:color="#127622" loext:opacity="100%" style:text-position="super 58%" fo:font-weight="normal" officeooo:rsid="02b1ae8e" fo:background-color="transparent" loext:char-shading-value="0" style:font-weight-asian="normal" style:font-weight-complex="normal"/>
    </style:style>
    <style:style style:name="T200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201" style:family="text">
      <style:text-properties officeooo:rsid="02b9b24f"/>
    </style:style>
    <style:style style:name="T202" style:family="text">
      <style:text-properties officeooo:rsid="02cf4d6c"/>
    </style:style>
    <style:style style:name="T203" style:family="text">
      <style:text-properties officeooo:rsid="02d0f047"/>
    </style:style>
    <style:style style:name="T204" style:family="text">
      <style:text-properties officeooo:rsid="02b1ff5c"/>
    </style:style>
    <style:style style:name="T205" style:family="text">
      <style:text-properties officeooo:rsid="02e9e0b9"/>
    </style:style>
    <style:style style:name="T206" style:family="text">
      <style:text-properties fo:color="#127622" loext:opacity="100%" officeooo:rsid="033a35e0"/>
    </style:style>
    <style:style style:name="T207" style:family="text">
      <style:text-properties style:font-name="Gabriela" officeooo:rsid="0191cd09"/>
    </style:style>
    <style:style style:name="T208" style:family="text">
      <style:text-properties style:font-name="Gabriela"/>
    </style:style>
    <style:style style:name="T209" style:family="text">
      <style:text-properties style:font-name="Gabriela" officeooo:rsid="02fa7946"/>
    </style:style>
    <style:style style:name="T210" style:family="text">
      <style:text-properties style:font-name="Gabriela" officeooo:rsid="02e62633"/>
    </style:style>
    <style:style style:name="T211" style:family="text">
      <style:text-properties fo:color="#127622" loext:opacity="100%" officeooo:rsid="006f5739"/>
    </style:style>
    <style:style style:name="T212" style:family="text">
      <style:text-properties fo:background-color="#ffbf00" loext:char-shading-value="0"/>
    </style:style>
    <style:style style:name="T213" style:family="text">
      <style:text-properties officeooo:rsid="02d35026"/>
    </style:style>
    <style:style style:name="T214" style:family="text">
      <style:text-properties fo:color="#127622" loext:opacity="100%" officeooo:rsid="02ecf23d"/>
    </style:style>
    <style:style style:name="T215" style:family="text">
      <style:text-properties officeooo:rsid="02f0b2fd"/>
    </style:style>
    <style:style style:name="T216" style:family="text">
      <style:text-properties fo:color="#127622" loext:opacity="100%" officeooo:rsid="02d35026"/>
    </style:style>
    <style:style style:name="T217" style:family="text">
      <style:text-properties officeooo:rsid="02d95148"/>
    </style:style>
    <style:style style:name="T218" style:family="text">
      <style:text-properties officeooo:rsid="02d55e43"/>
    </style:style>
    <style:style style:name="T219" style:family="text">
      <style:text-properties fo:font-style="italic" officeooo:rsid="02d55e43" style:font-style-asian="italic" style:font-style-complex="italic"/>
    </style:style>
    <style:style style:name="T220" style:family="text">
      <style:text-properties officeooo:rsid="02d651d5"/>
    </style:style>
    <style:style style:name="T221" style:family="text">
      <style:text-properties officeooo:rsid="02d825e8"/>
    </style:style>
    <style:style style:name="T222" style:family="text">
      <style:text-properties fo:font-style="normal" officeooo:rsid="01941bca" style:font-style-asian="normal" style:font-style-complex="normal"/>
    </style:style>
    <style:style style:name="T223" style:family="text">
      <style:text-properties officeooo:rsid="0192e710"/>
    </style:style>
    <style:style style:name="T224" style:family="text">
      <style:text-properties officeooo:rsid="02f4cb2c"/>
    </style:style>
    <style:style style:name="T225" style:family="text">
      <style:text-properties officeooo:rsid="02f2fb18"/>
    </style:style>
    <style:style style:name="T226" style:family="text">
      <style:text-properties fo:color="#127622" loext:opacity="100%" officeooo:rsid="02f2fb18"/>
    </style:style>
    <style:style style:name="T227" style:family="text">
      <style:text-properties officeooo:rsid="016fad37"/>
    </style:style>
    <style:style style:name="T228" style:family="text">
      <style:text-properties officeooo:rsid="0170c480"/>
    </style:style>
    <style:style style:name="T229" style:family="text">
      <style:text-properties fo:color="#127622" loext:opacity="100%" officeooo:rsid="018100be"/>
    </style:style>
    <style:style style:name="T230" style:family="text">
      <style:text-properties fo:color="#2a6099" loext:opacity="100%"/>
    </style:style>
    <style:style style:name="T231" style:family="text">
      <style:text-properties fo:color="#2a6099" loext:opacity="100%" fo:background-color="#ffff00" loext:char-shading-value="0"/>
    </style:style>
    <style:style style:name="T232" style:family="text">
      <style:text-properties style:text-position="super 58%" officeooo:rsid="018100be"/>
    </style:style>
    <style:style style:name="T233" style:family="text">
      <style:text-properties officeooo:rsid="018100be"/>
    </style:style>
    <style:style style:name="T234" style:family="text">
      <style:text-properties fo:color="#2a6099" loext:opacity="100%" fo:background-color="#ffbf00" loext:char-shading-value="0"/>
    </style:style>
    <style:style style:name="T235" style:family="text">
      <style:text-properties officeooo:rsid="01915f0f"/>
    </style:style>
    <style:style style:name="T236" style:family="text">
      <style:text-properties fo:color="#127622" loext:opacity="100%" officeooo:rsid="01915f0f"/>
    </style:style>
    <style:style style:name="T237" style:family="text">
      <style:text-properties fo:color="#127622" loext:opacity="100%" officeooo:rsid="033c6320"/>
    </style:style>
    <style:style style:name="T238" style:family="text">
      <style:text-properties officeooo:rsid="01b2e0b7"/>
    </style:style>
    <style:style style:name="T239" style:family="text">
      <style:text-properties fo:color="#127622" loext:opacity="100%" officeooo:rsid="01b2e0b7"/>
    </style:style>
    <style:style style:name="T240" style:family="text">
      <style:text-properties fo:color="#127622" loext:opacity="100%" style:text-position="super 58%" fo:background-color="transparent" loext:char-shading-value="0"/>
    </style:style>
    <style:style style:name="T241" style:family="text">
      <style:text-properties fo:color="#127622" loext:opacity="100%" style:text-position="super 58%" officeooo:rsid="033c9527" fo:background-color="transparent" loext:char-shading-value="0"/>
    </style:style>
    <style:style style:name="T242" style:family="text">
      <style:text-properties fo:color="#127622" loext:opacity="100%" style:text-position="super 58%" officeooo:rsid="02ee61a1"/>
    </style:style>
    <style:style style:name="T243" style:family="text">
      <style:text-properties fo:font-weight="bold" fo:background-color="#fff5ce" loext:char-shading-value="0" style:font-weight-asian="bold" style:font-weight-complex="bold"/>
    </style:style>
    <style:style style:name="T244" style:family="text">
      <style:text-properties officeooo:rsid="03008451"/>
    </style:style>
    <style:style style:name="T245" style:family="text">
      <style:text-properties fo:color="#127622" loext:opacity="100%" officeooo:rsid="03008451"/>
    </style:style>
    <style:style style:name="T246" style:family="text">
      <style:text-properties fo:color="#127622" loext:opacity="100%" officeooo:rsid="037b3eef"/>
    </style:style>
    <style:style style:name="T247" style:family="text">
      <style:text-properties fo:font-weight="normal" officeooo:rsid="0042cec2" style:font-weight-asian="normal" style:font-weight-complex="normal"/>
    </style:style>
    <style:style style:name="T248" style:family="text">
      <style:text-properties fo:color="#127622" loext:opacity="100%" fo:font-weight="normal" officeooo:rsid="0042cec2" style:font-weight-asian="normal" style:font-weight-complex="normal"/>
    </style:style>
    <style:style style:name="T249" style:family="text">
      <style:text-properties fo:color="#127622" loext:opacity="100%" fo:font-weight="normal" officeooo:rsid="037d36cd" style:font-weight-asian="normal" style:font-weight-complex="normal"/>
    </style:style>
    <style:style style:name="T250" style:family="text">
      <style:text-properties fo:color="#127622" loext:opacity="100%" fo:font-weight="normal" officeooo:rsid="01a773b1" style:font-weight-asian="normal" style:font-weight-complex="normal"/>
    </style:style>
    <style:style style:name="T251" style:family="text">
      <style:text-properties fo:color="#127622" loext:opacity="100%" fo:font-weight="normal" officeooo:rsid="0378b89b" style:font-weight-asian="normal" style:font-weight-complex="normal"/>
    </style:style>
    <style:style style:name="T252" style:family="text">
      <style:text-properties officeooo:rsid="01a1f76e"/>
    </style:style>
    <style:style style:name="T253" style:family="text">
      <style:text-properties officeooo:rsid="01a27081"/>
    </style:style>
    <style:style style:name="T254" style:family="text">
      <style:text-properties officeooo:rsid="01a38bf3"/>
    </style:style>
    <style:style style:name="T255" style:family="text">
      <style:text-properties fo:color="#127622" loext:opacity="100%" officeooo:rsid="02f02fed"/>
    </style:style>
    <style:style style:name="T256" style:family="text">
      <style:text-properties fo:color="#127622" loext:opacity="100%" officeooo:rsid="02f0335f"/>
    </style:style>
    <style:style style:name="T257" style:family="text">
      <style:text-properties officeooo:rsid="01a5619c"/>
    </style:style>
    <style:style style:name="T258" style:family="text">
      <style:text-properties officeooo:rsid="03068021"/>
    </style:style>
    <style:style style:name="T259" style:family="text">
      <style:text-properties officeooo:rsid="019db5fc"/>
    </style:style>
    <style:style style:name="T260" style:family="text">
      <style:text-properties fo:color="#127622" loext:opacity="100%" officeooo:rsid="019db5fc"/>
    </style:style>
    <style:style style:name="T261" style:family="text">
      <style:text-properties fo:color="#127622" loext:opacity="100%" officeooo:rsid="033d7b38"/>
    </style:style>
    <style:style style:name="T262" style:family="text">
      <style:text-properties officeooo:rsid="033fd7dd"/>
    </style:style>
    <style:style style:name="T263" style:family="text">
      <style:text-properties fo:color="#127622" loext:opacity="100%" officeooo:rsid="033fd7dd"/>
    </style:style>
    <style:style style:name="T264" style:family="text">
      <style:text-properties fo:color="#127622" loext:opacity="100%" officeooo:rsid="034049cc"/>
    </style:style>
    <style:style style:name="T265" style:family="text">
      <style:text-properties officeooo:rsid="01b5c8d8"/>
    </style:style>
    <style:style style:name="T266" style:family="text">
      <style:text-properties officeooo:rsid="01ba6372"/>
    </style:style>
    <style:style style:name="T267" style:family="text">
      <style:text-properties officeooo:rsid="0345b21b"/>
    </style:style>
    <style:style style:name="T268" style:family="text">
      <style:text-properties officeooo:rsid="0342a1b5"/>
    </style:style>
    <style:style style:name="T269" style:family="text">
      <style:text-properties fo:color="#127622" loext:opacity="100%" officeooo:rsid="01b5c8d8"/>
    </style:style>
    <style:style style:name="T270" style:family="text">
      <style:text-properties fo:color="#127622" loext:opacity="100%" officeooo:rsid="034125d3"/>
    </style:style>
    <style:style style:name="T271" style:family="text">
      <style:text-properties fo:color="#127622" loext:opacity="100%" officeooo:rsid="01c44531"/>
    </style:style>
    <style:style style:name="T272" style:family="text">
      <style:text-properties fo:color="#127622" loext:opacity="100%" officeooo:rsid="030cedba"/>
    </style:style>
    <style:style style:name="T273" style:family="text">
      <style:text-properties fo:color="#127622" loext:opacity="100%" officeooo:rsid="030f1f14"/>
    </style:style>
    <style:style style:name="T274" style:family="text">
      <style:text-properties fo:color="#ff0000" loext:opacity="100%" fo:background-color="#fff5ce" loext:char-shading-value="0"/>
    </style:style>
    <style:style style:name="T275" style:family="text">
      <style:text-properties officeooo:rsid="01be3592"/>
    </style:style>
    <style:style style:name="T276" style:family="text">
      <style:text-properties officeooo:rsid="01bc4cd7"/>
    </style:style>
    <style:style style:name="T277" style:family="text">
      <style:text-properties officeooo:rsid="03126008"/>
    </style:style>
    <style:style style:name="T278" style:family="text">
      <style:text-properties officeooo:rsid="03139a05"/>
    </style:style>
    <style:style style:name="T279" style:family="text">
      <style:text-properties fo:color="#127622" loext:opacity="100%" officeooo:rsid="0313fc6f"/>
    </style:style>
    <style:style style:name="T280" style:family="text">
      <style:text-properties officeooo:rsid="037fd6f6"/>
    </style:style>
    <style:style style:name="T281" style:family="text">
      <style:text-properties officeooo:rsid="034bc588"/>
    </style:style>
    <style:style style:name="T282" style:family="text">
      <style:text-properties fo:color="#127622" loext:opacity="100%" officeooo:rsid="034a7180"/>
    </style:style>
    <style:style style:name="T283" style:family="text">
      <style:text-properties style:font-name="Gabriela" fo:font-weight="normal" officeooo:rsid="01c1cc23" style:font-weight-asian="normal" style:font-weight-complex="normal"/>
    </style:style>
    <style:style style:name="T284" style:family="text">
      <style:text-properties style:font-name="Gabriela" fo:font-weight="normal" officeooo:rsid="01c1e042" style:font-weight-asian="normal" style:font-weight-complex="normal"/>
    </style:style>
    <style:style style:name="T285" style:family="text">
      <style:text-properties style:font-name="Gabriela" fo:font-weight="normal" officeooo:rsid="034cfe3c" style:font-weight-asian="normal" style:font-weight-complex="normal"/>
    </style:style>
    <style:style style:name="T286" style:family="text">
      <style:text-properties officeooo:rsid="03814333"/>
    </style:style>
    <style:style style:name="T287" style:family="text">
      <style:text-properties officeooo:rsid="01df3b3b"/>
    </style:style>
    <style:style style:name="T288" style:family="text">
      <style:text-properties fo:color="#127622" loext:opacity="100%" officeooo:rsid="01e098e2"/>
    </style:style>
    <style:style style:name="T289" style:family="text">
      <style:text-properties officeooo:rsid="01e098e2"/>
    </style:style>
    <style:style style:name="T290" style:family="text">
      <style:text-properties fo:color="#127622" loext:opacity="100%" officeooo:rsid="01df3b3b"/>
    </style:style>
    <style:style style:name="T291" style:family="text">
      <style:text-properties officeooo:rsid="01cb2bac"/>
    </style:style>
    <style:style style:name="T292" style:family="text">
      <style:text-properties fo:color="#127622" loext:opacity="100%" officeooo:rsid="01dd9a81"/>
    </style:style>
    <style:style style:name="T293" style:family="text">
      <style:text-properties officeooo:rsid="01dd9a81"/>
    </style:style>
    <style:style style:name="T294" style:family="text">
      <style:text-properties fo:color="#127622" loext:opacity="100%" officeooo:rsid="020a464f"/>
    </style:style>
    <style:style style:name="T295" style:family="text">
      <style:text-properties fo:color="#127622" loext:opacity="100%" officeooo:rsid="034dfe98"/>
    </style:style>
    <style:style style:name="T296" style:family="text">
      <style:text-properties fo:background-color="#ffd8ce" loext:char-shading-value="0"/>
    </style:style>
    <style:style style:name="T297" style:family="text">
      <style:text-properties style:text-position="super 58%" fo:background-color="transparent" loext:char-shading-value="0"/>
    </style:style>
    <style:style style:name="T298" style:family="text">
      <style:text-properties style:text-position="super 58%" officeooo:rsid="01cf0ff1" fo:background-color="transparent" loext:char-shading-value="0"/>
    </style:style>
    <style:style style:name="T299" style:family="text">
      <style:text-properties fo:background-color="#dde8cb" loext:char-shading-value="0"/>
    </style:style>
    <style:style style:name="T300" style:family="text">
      <style:text-properties style:text-position="super 58%" officeooo:rsid="01d104b2" fo:background-color="transparent" loext:char-shading-value="0"/>
    </style:style>
    <style:style style:name="T301" style:family="text">
      <style:text-properties officeooo:rsid="01d3c102"/>
    </style:style>
    <style:style style:name="T302" style:family="text">
      <style:text-properties officeooo:rsid="01e61fd9"/>
    </style:style>
    <style:style style:name="T303" style:family="text">
      <style:text-properties fo:color="#127622" loext:opacity="100%" officeooo:rsid="01e61fd9"/>
    </style:style>
    <style:style style:name="T304" style:family="text">
      <style:text-properties fo:color="#127622" loext:opacity="100%" officeooo:rsid="0314f8d1"/>
    </style:style>
    <style:style style:name="T305" style:family="text">
      <style:text-properties officeooo:rsid="01d6748a"/>
    </style:style>
    <style:style style:name="T306" style:family="text">
      <style:text-properties officeooo:rsid="01d57a5f"/>
    </style:style>
    <style:style style:name="T307" style:family="text">
      <style:text-properties officeooo:rsid="038428d0"/>
    </style:style>
    <style:style style:name="T308" style:family="text">
      <style:text-properties fo:color="#127622" loext:opacity="100%" fo:font-weight="normal" officeooo:rsid="01cf0ff1" style:font-weight-asian="normal" style:font-weight-complex="normal"/>
    </style:style>
    <style:style style:name="T309" style:family="text">
      <style:text-properties style:text-position="super 58%" officeooo:rsid="01ed5597"/>
    </style:style>
    <style:style style:name="T310" style:family="text">
      <style:text-properties fo:color="#127622" loext:opacity="100%" style:text-position="super 58%" officeooo:rsid="01ed5597"/>
    </style:style>
    <style:style style:name="T311" style:family="text">
      <style:text-properties fo:font-weight="normal" officeooo:rsid="01e1de1e" style:font-weight-asian="normal" style:font-weight-complex="normal"/>
    </style:style>
    <style:style style:name="T312" style:family="text">
      <style:text-properties fo:font-weight="normal" officeooo:rsid="0350cc6e" style:font-weight-asian="normal" style:font-weight-complex="normal"/>
    </style:style>
    <style:style style:name="T313" style:family="text">
      <style:text-properties style:font-name="Gabriela" fo:font-weight="normal" officeooo:rsid="01f05925" style:font-weight-asian="normal" style:font-weight-complex="normal"/>
    </style:style>
    <style:style style:name="T314" style:family="text">
      <style:text-properties fo:font-weight="normal" officeooo:rsid="01f05925" style:font-weight-asian="normal" style:font-weight-complex="normal"/>
    </style:style>
    <style:style style:name="T315" style:family="text">
      <style:text-properties fo:font-style="italic" fo:font-weight="normal" officeooo:rsid="01f05925" style:font-style-asian="italic" style:font-weight-asian="normal" style:font-style-complex="italic" style:font-weight-complex="normal"/>
    </style:style>
    <style:style style:name="T316" style:family="text">
      <style:text-properties fo:font-weight="normal" officeooo:rsid="01f86f85" style:font-weight-asian="normal" style:font-weight-complex="normal"/>
    </style:style>
    <style:style style:name="T317" style:family="text">
      <style:text-properties fo:font-weight="normal" officeooo:rsid="01f77f47" style:font-weight-asian="normal" style:font-weight-complex="normal"/>
    </style:style>
    <style:style style:name="T318" style:family="text">
      <style:text-properties fo:font-weight="normal" officeooo:rsid="01f4bfa4" style:font-weight-asian="normal" style:font-weight-complex="normal"/>
    </style:style>
    <style:style style:name="T319" style:family="text">
      <style:text-properties fo:font-weight="normal" officeooo:rsid="038799e2" style:font-weight-asian="normal" style:font-weight-complex="normal"/>
    </style:style>
    <style:style style:name="T320" style:family="text">
      <style:text-properties fo:font-weight="normal" officeooo:rsid="0352eb03" style:font-weight-asian="normal" style:font-weight-complex="normal"/>
    </style:style>
    <style:style style:name="T321" style:family="text">
      <style:text-properties fo:font-weight="normal" officeooo:rsid="0246919b" style:font-weight-asian="normal" style:font-weight-complex="normal"/>
    </style:style>
    <style:style style:name="T322" style:family="text">
      <style:text-properties fo:font-style="italic" fo:font-weight="normal" officeooo:rsid="01941bca" style:font-style-asian="italic" style:font-weight-asian="normal" style:font-style-complex="italic" style:font-weight-complex="normal"/>
    </style:style>
    <style:style style:name="T323" style:family="text">
      <style:text-properties fo:font-weight="normal" officeooo:rsid="02490e4e" style:font-weight-asian="normal" style:font-weight-complex="normal"/>
    </style:style>
    <style:style style:name="T324" style:family="text">
      <style:text-properties fo:font-weight="normal" officeooo:rsid="0354b191" style:font-weight-asian="normal" style:font-weight-complex="normal"/>
    </style:style>
    <style:style style:name="T325" style:family="text">
      <style:text-properties fo:color="#127622" loext:opacity="100%" fo:font-weight="normal" officeooo:rsid="01f05925" style:font-weight-asian="normal" style:font-weight-complex="normal"/>
    </style:style>
    <style:style style:name="T326" style:family="text">
      <style:text-properties fo:color="#127622" loext:opacity="100%" fo:font-weight="normal" officeooo:rsid="031bb1c5" style:font-weight-asian="normal" style:font-weight-complex="normal"/>
    </style:style>
    <style:style style:name="T327" style:family="text">
      <style:text-properties fo:color="#127622" loext:opacity="100%" fo:font-weight="normal" officeooo:rsid="01f54e02" style:font-weight-asian="normal" style:font-weight-complex="normal"/>
    </style:style>
    <style:style style:name="T328" style:family="text">
      <style:text-properties fo:color="#127622" loext:opacity="100%" fo:font-weight="normal" officeooo:rsid="038802e0" style:font-weight-asian="normal" style:font-weight-complex="normal"/>
    </style:style>
    <style:style style:name="T329" style:family="text">
      <style:text-properties fo:font-weight="normal" officeooo:rsid="0359da8e" style:font-weight-asian="normal" style:font-weight-complex="normal"/>
    </style:style>
    <style:style style:name="T330" style:family="text">
      <style:text-properties fo:font-style="italic" fo:font-weight="normal" officeooo:rsid="0359da8e" style:font-style-asian="italic" style:font-weight-asian="normal" style:font-style-complex="italic" style:font-weight-complex="normal"/>
    </style:style>
    <style:style style:name="T331" style:family="text">
      <style:text-properties fo:font-style="normal" fo:font-weight="normal" officeooo:rsid="0359da8e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35a7d2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35c4ba4" style:font-style-asian="normal" style:font-weight-asian="normal" style:font-style-complex="normal" style:font-weight-complex="normal"/>
    </style:style>
    <style:style style:name="T334" style:family="text">
      <style:text-properties fo:color="#127622" loext:opacity="100%" fo:font-style="normal" fo:font-weight="normal" officeooo:rsid="035c4ba4" style:font-style-asian="normal" style:font-weight-asian="normal" style:font-style-complex="normal" style:font-weight-complex="normal"/>
    </style:style>
    <style:style style:name="T335" style:family="text">
      <style:text-properties officeooo:rsid="032234f0"/>
    </style:style>
    <style:style style:name="T336" style:family="text">
      <style:text-properties fo:color="#127622" loext:opacity="100%" officeooo:rsid="032234f0"/>
    </style:style>
    <style:style style:name="T337" style:family="text">
      <style:text-properties fo:color="#127622" loext:opacity="100%" officeooo:rsid="03234820"/>
    </style:style>
    <style:style style:name="T338" style:family="text">
      <style:text-properties officeooo:rsid="03234820"/>
    </style:style>
    <style:style style:name="T339" style:family="text">
      <style:text-properties officeooo:rsid="01f6603c"/>
    </style:style>
    <style:style style:name="T340" style:family="text">
      <style:text-properties officeooo:rsid="01f9198e"/>
    </style:style>
    <style:style style:name="T341" style:family="text">
      <style:text-properties officeooo:rsid="01fac755"/>
    </style:style>
    <style:style style:name="T342" style:family="text">
      <style:text-properties officeooo:rsid="02017414"/>
    </style:style>
    <style:style style:name="T343" style:family="text">
      <style:text-properties officeooo:rsid="021429ce"/>
    </style:style>
    <style:style style:name="T344" style:family="text">
      <style:text-properties fo:font-weight="normal" officeooo:rsid="01ff1ec3" style:font-weight-asian="normal" style:font-weight-complex="normal"/>
    </style:style>
    <style:style style:name="T345" style:family="text">
      <style:text-properties fo:font-weight="normal" officeooo:rsid="01fb483b" style:font-weight-asian="normal" style:font-weight-complex="normal"/>
    </style:style>
    <style:style style:name="T346" style:family="text">
      <style:text-properties fo:font-weight="normal" officeooo:rsid="01fd3ffb" style:font-weight-asian="normal" style:font-weight-complex="normal"/>
    </style:style>
    <style:style style:name="T347" style:family="text">
      <style:text-properties fo:font-weight="normal" officeooo:rsid="01fedb7e" style:font-weight-asian="normal" style:font-weight-complex="normal"/>
    </style:style>
    <style:style style:name="T348" style:family="text">
      <style:text-properties fo:color="#127622" loext:opacity="100%" fo:font-weight="normal" officeooo:rsid="01fedb7e" style:font-weight-asian="normal" style:font-weight-complex="normal"/>
    </style:style>
    <style:style style:name="T349" style:family="text">
      <style:text-properties fo:font-weight="normal" officeooo:rsid="035879a1" style:font-weight-asian="normal" style:font-weight-complex="normal"/>
    </style:style>
    <style:style style:name="T350" style:family="text">
      <style:text-properties fo:font-weight="normal" officeooo:rsid="03893544" style:font-weight-asian="normal" style:font-weight-complex="normal"/>
    </style:style>
    <style:style style:name="T351" style:family="text">
      <style:text-properties fo:color="#127622" loext:opacity="100%" fo:font-weight="normal" officeooo:rsid="035879a1" style:font-weight-asian="normal" style:font-weight-complex="normal"/>
    </style:style>
    <style:style style:name="T352" style:family="text">
      <style:text-properties officeooo:rsid="03255cc9"/>
    </style:style>
    <style:style style:name="T353" style:family="text">
      <style:text-properties fo:color="#127622" loext:opacity="100%" officeooo:rsid="03255cc9"/>
    </style:style>
    <style:style style:name="T354" style:family="text">
      <style:text-properties fo:font-style="normal" style:font-style-asian="normal" style:font-style-complex="normal"/>
    </style:style>
    <style:style style:name="T355" style:family="text">
      <style:text-properties officeooo:rsid="03939261"/>
    </style:style>
    <style:style style:name="T356" style:family="text">
      <style:text-properties officeooo:rsid="0364493b"/>
    </style:style>
    <style:style style:name="T357" style:family="text">
      <style:text-properties officeooo:rsid="009f05ee"/>
    </style:style>
    <style:style style:name="T358" style:family="text">
      <style:text-properties fo:color="#127622" loext:opacity="100%" officeooo:rsid="009f05ee"/>
    </style:style>
    <style:style style:name="T359" style:family="text">
      <style:text-properties officeooo:rsid="00b5b2b6"/>
    </style:style>
    <style:style style:name="T360" style:family="text">
      <style:text-properties officeooo:rsid="014a31f8"/>
    </style:style>
    <style:style style:name="T361" style:family="text">
      <style:text-properties officeooo:rsid="014a3459"/>
    </style:style>
    <style:style style:name="T362" style:family="text">
      <style:text-properties officeooo:rsid="014bf019"/>
    </style:style>
    <style:style style:name="T363" style:family="text">
      <style:text-properties officeooo:rsid="014fe7dc"/>
    </style:style>
    <style:style style:name="T364" style:family="text">
      <style:text-properties officeooo:rsid="01511634"/>
    </style:style>
    <style:style style:name="T365" style:family="text">
      <style:text-properties officeooo:rsid="0148ff6f"/>
    </style:style>
    <style:style style:name="T366" style:family="text">
      <style:text-properties fo:color="#127622" loext:opacity="100%" officeooo:rsid="0148ff6f"/>
    </style:style>
    <style:style style:name="T367" style:family="text">
      <style:text-properties fo:color="#127622" loext:opacity="100%" officeooo:rsid="03196c4d"/>
    </style:style>
    <style:style style:name="T368" style:family="text">
      <style:text-properties officeooo:rsid="0318b05d"/>
    </style:style>
    <style:style style:name="T369" style:family="text">
      <style:text-properties officeooo:rsid="0152e50b"/>
    </style:style>
    <style:style style:name="T370" style:family="text">
      <style:text-properties officeooo:rsid="01f2fcd6"/>
    </style:style>
    <style:style style:name="T371" style:family="text">
      <style:text-properties officeooo:rsid="03196c4d"/>
    </style:style>
    <style:style style:name="T372" style:family="text">
      <style:text-properties officeooo:rsid="03634028"/>
    </style:style>
    <style:style style:name="T373" style:family="text">
      <style:text-properties officeooo:rsid="036bfe34"/>
    </style:style>
    <style:style style:name="T374" style:family="text">
      <style:text-properties officeooo:rsid="036248b0"/>
    </style:style>
    <style:style style:name="T375" style:family="text">
      <style:text-properties fo:color="#127622" loext:opacity="100%" fo:font-style="normal" officeooo:rsid="036248b0" style:font-style-asian="normal" style:font-style-complex="normal"/>
    </style:style>
    <style:style style:name="T376" style:family="text">
      <style:text-properties fo:font-style="normal" officeooo:rsid="036248b0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anointed cherub that covereth</text:p>
      <text:p text:style-name="Standard"/>
      <text:p text:style-name="P2"><text:span text:style-name="T1">In </text:span><text:span text:style-name="T2">Ezekiel 28:14</text:span><text:span text:style-name="T1"> </text:span><text:span text:style-name="T3">Satan</text:span><text:span text:style-name="T4"> is called “</text:span><text:span text:style-name="T5">the anointed cherub that covereth</text:span><text:span text:style-name="T4">”; but, what does that mean?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Verse</text:p>
          </table:table-cell>
          <table:table-cell table:style-name="Table1.B1" office:value-type="string">
            <text:p text:style-name="P4">Tense</text:p>
          </table:table-cell>
        </table:table-row>
        <table:table-row>
          <table:table-cell table:style-name="Table1.A2" office:value-type="string">
            <text:p text:style-name="P5"><text:span text:style-name="T6">Ezekiel 28:13-1</text:span><text:span text:style-name="T7">6</text:span><text:line-break/><text:span text:style-name="T8">13</text:span> Thou hast been in Eden the garden of God; every precious stone was thy covering, the sardius, topaz, and the diamond, the beryl, the onyx, and the jasper, the sapphire, the emerald, and the carbuncle, and gold: the workmanship of thy tabrets<text:span text:style-name="T9">*</text:span> and of thy pipes<text:span text:style-name="T9">*</text:span> was prepared in thee in the day that thou wast created.</text:p>
          </table:table-cell>
          <table:table-cell table:style-name="Table1.B2" office:value-type="string">
            <text:p text:style-name="P6">past</text:p>
          </table:table-cell>
        </table:table-row>
        <table:table-row>
          <table:table-cell table:style-name="Table1.A2" office:value-type="string">
            <text:p text:style-name="P7"><text:span text:style-name="T8">14</text:span> Thou art <text:span text:style-name="T10">the anointed</text:span><text:span text:style-name="T11">*</text:span><text:span text:style-name="T12">*</text:span><text:span text:style-name="T10"> cherub that covereth</text:span>; and I have set thee so:</text:p>
          </table:table-cell>
          <table:table-cell table:style-name="Table1.B2" office:value-type="string">
            <text:p text:style-name="P8">Present</text:p>
          </table:table-cell>
        </table:table-row>
        <table:table-row>
          <table:table-cell table:style-name="Table1.A2" office:value-type="string">
            <text:p text:style-name="P7"><text:span text:style-name="T13">14</text:span><text:span text:style-name="T14"> </text:span>thou wast upon the holy mountain of God; thou hast walked up and down in the midst of the stones of fire.</text:p>
          </table:table-cell>
          <table:table-cell table:style-name="Table1.B2" office:value-type="string">
            <text:p text:style-name="P6">past</text:p>
          </table:table-cell>
        </table:table-row>
        <table:table-row>
          <table:table-cell table:style-name="Table1.A2" office:value-type="string">
            <text:p text:style-name="P7"><text:span text:style-name="T8">15</text:span> Thou wast perfect in thy ways from the day that thou wast created, till iniquity was found in thee. <text:span text:style-name="T8">16</text:span> By the multitude of thy merchandise they have filled <text:span text:style-name="T15">the midst of thee</text:span> with violence, and thou hast sinned:</text:p>
          </table:table-cell>
          <table:table-cell table:style-name="Table1.B2" office:value-type="string">
            <text:p text:style-name="P9">past</text:p>
          </table:table-cell>
        </table:table-row>
        <table:table-row>
          <table:table-cell table:style-name="Table1.A2" office:value-type="string">
            <text:p text:style-name="P10"><text:span text:style-name="T16">16</text:span><text:span text:style-name="T17"> </text:span>therefore I will cast thee as profane<text:span text:style-name="T18"> out of the mountain of God: and </text:span>I will destroy thee, <text:span text:style-name="T10">O covering cherub</text:span><text:span text:style-name="T18">, from the midst of the stones of fire.</text:span></text:p>
          </table:table-cell>
          <table:table-cell table:style-name="Table1.B2" office:value-type="string">
            <text:p text:style-name="P9">future</text:p>
          </table:table-cell>
        </table:table-row>
      </table:table>
      <text:list text:style-name="L1">
        <text:list-item>
          <text:p text:style-name="P11">The (singular) anointed cherub.</text:p>
        </text:list-item>
        <text:list-item>
          <text:p text:style-name="P12">Take note that the first part of verse <text:span text:style-name="T6">14</text:span> is present tense.</text:p>
        </text:list-item>
        <text:list-item>
          <text:p text:style-name="P13"><text:span text:style-name="T19">Take note that verse </text:span><text:span text:style-name="T20">16</text:span><text:span text:style-name="T19"> says “</text:span><text:span text:style-name="T21">the midst of thee</text:span><text:span text:style-name="T19">”. </text:span><text:span text:style-name="T22">People or creatures are never described in </text:span><text:span text:style-name="T23">scripture</text:span><text:span text:style-name="T22"> as being “filled with violence” as in an internal reference </text:span><text:span text:style-name="T24">to the creature itself</text:span><text:span text:style-name="T22">. This appears to be a spatial reference as in every other usage of the phrase “</text:span><text:span text:style-name="T25">with violence” </text:span><text:span text:style-name="T26">(</text:span><text:span text:style-name="T27">Gen</text:span><text:span text:style-name="T28">esis</text:span><text:span text:style-name="T27"> 6:11,13</text:span>, <text:span text:style-name="T29">Eze</text:span><text:span text:style-name="T30">kiel</text:span><text:span text:style-name="T29"> 8:17</text:span>, <text:span text:style-name="T31">Zeph</text:span><text:span text:style-name="T30">aniah</text:span><text:span text:style-name="T31"> 1:9</text:span>, <text:span text:style-name="T31">Rev</text:span><text:span text:style-name="T32">elation</text:span><text:span text:style-name="T31"> 18:21</text:span><text:span text:style-name="T26">).</text:span></text:p>
          <text:list>
            <text:list-item>
              <text:p text:style-name="P14">The midst is the container (the space covered by the cherub).</text:p>
            </text:list-item>
            <text:list-item>
              <text:p text:style-name="P15">The violence is the material that occupies that space.</text:p>
            </text:list-item>
          </text:list>
        </text:list-item>
      </text:list>
      <text:p text:style-name="P16"/>
      <text:p text:style-name="P17"><text:span text:style-name="T9">*</text:span> The <text:span text:style-name="T33">tabret (or tabor) is historically a hand-held drum that produces lower frequencies (</text:span><text:span text:style-name="T34">Alto/</text:span><text:span text:style-name="T35">Bass; </text:span><text:span text:style-name="T36">60-200Hz</text:span><text:span text:style-name="T33">). The pipes are historically wind instruments that produce higher frequencies (Soprano/</text:span><text:span text:style-name="T35">Tenor; </text:span><text:span text:style-name="T36">500-3,000+Hz</text:span><text:span text:style-name="T33">). </text:span><text:span text:style-name="T37">The h</text:span><text:span text:style-name="T36">uman hearing range is 20-20,000Hz</text:span><text:span text:style-name="T33"> </text:span><text:span text:style-name="T38">and</text:span><text:span text:style-name="T36"> as we age the higher frequency limit drops to around 12,000-15,000Hz. </text:span><text:span text:style-name="T39">Most speech and music is in the 250-4,000Hz range. </text:span><text:span text:style-name="T40">This </text:span><text:span text:style-name="T39">verse </text:span><text:span text:style-name="T40">tells us that Lucifer was given the ability to simultaneously produce both lower and higher frequency sounds. </text:span><text:span text:style-name="T41">So, w</text:span><text:span text:style-name="T42">as he Alto or Soprano? Yes.</text:span></text:p>
      <text:p text:style-name="P16"/>
      <text:p text:style-name="P18"><text:span text:style-name="T43">*</text:span><text:span text:style-name="T9">*</text:span><text:span text:style-name="T44"> “anointed</text:span><text:span text:style-name="T45">” </text:span><text:span text:style-name="T46">(</text:span><text:span text:style-name="T45">מִמְשַׁח </text:span><text:span text:style-name="T47">mimšach</text:span><text:span text:style-name="T45"> </text:span><text:span text:style-name="T48">H4473</text:span><text:span text:style-name="T46">) </text:span><text:span text:style-name="T45">here in the 1524 Bomberg MT is a </text:span><text:span text:style-name="T49">hapax legomenon</text:span><text:span text:style-name="T45"> (this </text:span><text:span text:style-name="T50">unique</text:span><text:span text:style-name="T45"> Hebrew form </text:span><text:span text:style-name="T51">of the root M-Sh-Ch </text:span><text:span text:style-name="T52">is marked in the Masora Parva with the letter</text:span><text:span text:style-name="T45"> </text:span><text:span text:style-name="T53">ל </text:span><text:span text:style-name="T54">Lamed</text:span><text:span text:style-name="T53">, </text:span><text:span text:style-name="T55">which means</text:span><text:span text:style-name="T53"> </text:span><text:span text:style-name="T54">leit</text:span><text:span text:style-name="T53"> </text:span><text:span text:style-name="T56">or </text:span><text:span text:style-name="T53">"none other"</text:span><text:span text:style-name="T57">)</text:span><text:span text:style-name="T53">. </text:span><text:span text:style-name="T58">It is different from </text:span><text:span text:style-name="T59">every other form of the root </text:span><text:span text:style-name="T60">in the OT</text:span><text:span text:style-name="T59">:</text:span><text:span text:style-name="T58"> the verb form “to anoint” </text:span><text:span text:style-name="T53">מָשַׁח (</text:span><text:span text:style-name="T54">māšaḥ </text:span><text:span text:style-name="T61">68x</text:span><text:span text:style-name="T62"> </text:span><text:span text:style-name="T63">H4886</text:span><text:span text:style-name="T53">), </text:span><text:span text:style-name="T58">the noun form “Messiah/Anointed One” </text:span><text:span text:style-name="T53">מָשִׁיחַ (</text:span><text:span text:style-name="T54">māšîaḥ </text:span><text:span text:style-name="T61">39x</text:span><text:span text:style-name="T64"> H4899</text:span><text:span text:style-name="T53">), </text:span><text:span text:style-name="T58">and the noun for</text:span><text:span text:style-name="T65">m</text:span><text:span text:style-name="T58"> “anointing/ointment” </text:span><text:span text:style-name="T53">מִשְׁחָה (</text:span><text:span text:style-name="T54">mišḥāh </text:span><text:span text:style-name="T61">21x</text:span><text:span text:style-name="T62"> </text:span><text:span text:style-name="T63">H4888</text:span><text:span text:style-name="T53">). </text:span><text:span text:style-name="T59">Because </text:span><text:span text:style-name="T66">this form only appears once in the entire OT</text:span><text:span text:style-name="T53"> </text:span><text:span text:style-name="T59">there are two schools of thought as to the definition of the </text:span><text:span text:style-name="T67">Hebrew </text:span><text:span text:style-name="T59">word:</text:span></text:p>
      <text:list text:style-name="L2">
        <text:list-item>
          <text:p text:style-name="P19">Contextually <text:span text:style-name="T68">(a noun of status)</text:span></text:p>
          <text:list>
            <text:list-item>
              <text:p text:style-name="P20">Set apart by God for a purpose.</text:p>
            </text:list-item>
          </text:list>
        </text:list-item>
        <text:list-item>
          <text:p text:style-name="P20"><text:span text:style-name="T69">Grammar &amp; c</text:span>ognate languages (David Kimhi – RaDaK <text:span text:style-name="T70">[</text:span>Rabbi David Kimhi<text:span text:style-name="T70">]; </text:span>1160-1235AD; Narbonne, France)</text:p>
          <text:list>
            <text:list-item>
              <text:p text:style-name="P21">Because the root M-Sh-Ch <text:span text:style-name="T71">(that H4473 is based on)</text:span> is frequently used for measuring or ext<text:span text:style-name="T64">ending (like a measure of oil or land) some assert that </text:span><text:span text:style-name="T72">mimšach</text:span><text:span text:style-name="T73"> is a noun of extension.</text:span></text:p>
            </text:list-item>
            <text:list-item>
              <text:p text:style-name="P20"><text:span text:style-name="T64">In Aramaic, </text:span><text:span text:style-name="T72">meshach</text:span><text:span text:style-name="T64"> refers to measuring or spreading out. Since the very next word in the verse is הַסּוֹכֵךְ (</text:span><text:span text:style-name="T72">hassôkēḵ</text:span><text:span text:style-name="T64"> - "</text:span><text:span text:style-name="T74">that covereth</text:span><text:span text:style-name="T64">"), it makes logical sense that "</text:span><text:span text:style-name="T74">anointed</text:span><text:span text:style-name="T64">" actually describes the </text:span><text:span text:style-name="T72">physical span </text:span><text:span text:style-name="T75">(e</text:span><text:span text:style-name="T76">g. </text:span>“<text:span text:style-name="T69">The Cherub of outspread [wings] that covereth”</text:span><text:span text:style-name="T77">).</text:span></text:p>
            </text:list-item>
          </text:list>
        </text:list-item>
      </text:list>
      <text:p text:style-name="P16"/>
      <text:p text:style-name="P16"/>
      <text:p text:style-name="P22"><text:soft-page-break/>The words “cherub” (singular) or “cherub<text:span text:style-name="T78">im</text:span>s” (plural) appear <text:span text:style-name="T79">9</text:span>5 times in <text:span text:style-name="T80">78</text:span> verses.</text:p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3">Cherub</text:p>
            <text:p text:style-name="P24">(30x in 21 verses)</text:p>
          </table:table-cell>
          <table:table-cell table:style-name="Table13.B1" office:value-type="string">
            <text:p text:style-name="P25">Exo 25:19, 37:8</text:p>
            <text:p text:style-name="P25">2Sa 22:11</text:p>
            <text:p text:style-name="P25">1Ki 6:24,25,26,27</text:p>
            <text:p text:style-name="P25">2Ch 3:11,12</text:p>
            <text:p text:style-name="P25">Ezr 2:59 <text:span text:style-name="T81">(a </text:span><text:span text:style-name="T82">locative noun</text:span><text:span text:style-name="T81">)</text:span></text:p>
            <text:p text:style-name="P26">Neh 7:61 <text:s/><text:span text:style-name="T81">(a </text:span><text:span text:style-name="T82">locative noun</text:span><text:span text:style-name="T81">)</text:span></text:p>
            <text:p text:style-name="P25">Psa 18:10</text:p>
            <text:p text:style-name="P27">Eze 9:3, 10:2,4,7,9,14, 28:14,16, 41:18</text:p>
          </table:table-cell>
        </table:table-row>
        <table:table-row>
          <table:table-cell table:style-name="Table13.A2" office:value-type="string">
            <text:p text:style-name="P23">Cherubims</text:p>
            <text:p text:style-name="P28">(65x in 57 verses)</text:p>
          </table:table-cell>
          <table:table-cell table:style-name="Table13.B2" office:value-type="string">
            <text:p text:style-name="P27">Gen 3:24 <text:span text:style-name="T83">(“C” is capitalized and it’s not the beginning of </text:span><text:span text:style-name="T84">a</text:span><text:span text:style-name="T83"> sentence or </text:span><text:span text:style-name="T84">a </text:span><text:span text:style-name="T83">statement)</text:span></text:p>
            <text:p text:style-name="P27">Exo 25:18,19,20,<text:span text:style-name="T85">22, 26:1,31, 36:8,35, 37:7,8,9</text:span></text:p>
            <text:p text:style-name="P29">Num 7:89</text:p>
            <text:p text:style-name="P29">1Sa 4:4, 6:2</text:p>
            <text:p text:style-name="P27"><text:span text:style-name="T85">1Ki 6:23,25,27,28,29,32,35, 7:29,36, 8:6,</text:span><text:span text:style-name="T86">7</text:span></text:p>
            <text:p text:style-name="P30">2Ki 19:15</text:p>
            <text:p text:style-name="P30">1Ch 13:6, 28:18</text:p>
            <text:p text:style-name="P30">2Ch 3:7,10,11,13,14, 5:7,8</text:p>
            <text:p text:style-name="P27"><text:span text:style-name="T86">Psa 80:1, </text:span><text:span text:style-name="T87">99:1</text:span></text:p>
            <text:p text:style-name="P31">Isa 37:16</text:p>
            <text:p text:style-name="P31">Eze 10:1,2,3,5,6,7,8,9,15,16,18,19,20, 11:22, 41:18,20,25</text:p>
            <text:p text:style-name="P31">Heb 9:5</text:p>
          </table:table-cell>
        </table:table-row>
      </table:table>
      <text:p text:style-name="P32"/>
      <text:p text:style-name="P32"/>
      <text:p text:style-name="P32"/>
      <text:p text:style-name="P32"/>
      <text:p text:style-name="P33">Chasing the <text:span text:style-name="T88">W</text:span>hite Rabbit</text:p>
      <text:p text:style-name="P3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5"><text:span text:style-name="T6">Genesis 1:6-8</text:span><text:line-break/><text:span text:style-name="T8">6</text:span> And God said, Let there be <text:span text:style-name="T10">a firmament</text:span> in the midst of the waters, and let it divide the waters from the waters. <text:span text:style-name="T8">7</text:span> And God made <text:span text:style-name="T10">the firmament</text:span>, and divided the waters which were under <text:span text:style-name="T10">the firmament</text:span> from the waters which were above <text:span text:style-name="T10">the firmament</text:span>: and it was so. <text:span text:style-name="T8">8</text:span> And God called <text:span text:style-name="T10">the firmament</text:span><text:span text:style-name="T18"> </text:span><text:span text:style-name="T89">Heaven</text:span>. And the evening and the morning were the second day.</text:p>
          </table:table-cell>
          <table:table-cell table:style-name="Table12.B1" table:number-rows-spanned="2" office:value-type="string">
            <text:p text:style-name="P35"><text:span text:style-name="T6">1 Kings 8:27</text:span> (<text:span text:style-name="T6">2Ch 2:6</text:span>, <text:span text:style-name="T6">2Ch 6:18</text:span>, <text:span text:style-name="T90">Neh 9:6</text:span>)<text:line-break/>But will God indeed dwell on the earth? behold, <text:span text:style-name="T91">the </text:span><text:span text:style-name="T89">heaven</text:span> and <text:span text:style-name="T92">heaven of heaven</text:span><text:span text:style-name="T93">s</text:span> cannot contain thee; how much less this house that I have builded?</text:p>
          </table:table-cell>
        </table:table-row>
        <table:table-row>
          <table:table-cell table:style-name="Table12.A2" office:value-type="string">
            <text:p text:style-name="P35"><text:span text:style-name="T6">Genesis 1:14-15</text:span><text:line-break/><text:span text:style-name="T8">14</text:span> And God said, Let there be lights in <text:span text:style-name="T15">the firmament of the </text:span><text:span text:style-name="T89">heaven</text:span> to divide the day from the night; and let them be for signs, and for seasons, and for days, and years: <text:span text:style-name="T8">15</text:span> And let them be for lights in <text:span text:style-name="T15">the firmament of the </text:span><text:span text:style-name="T89">heaven</text:span> to give light upon the earth: and it was so.</text:p>
          </table:table-cell>
          <table:covered-table-cell table:style-name="Table12.B1"/>
        </table:table-row>
      </table:table>
      <text:list text:style-name="L3">
        <text:list-item>
          <text:p text:style-name="P36">The heaven is the <text:span text:style-name="T94">physical </text:span><text:span text:style-name="T95">expanse</text:span> <text:span text:style-name="T96">surrounding</text:span> <text:span text:style-name="T97">the </text:span>Earth, <text:span text:style-name="T96">also known as the sky </text:span><text:span text:style-name="T98">or the atmosphere.</text:span></text:p>
        </text:list-item>
        <text:list-item>
          <text:p text:style-name="P37">The “<text:span text:style-name="T99">firmament of the heaven</text:span>” is where the <text:span text:style-name="T94">physical</text:span> stars <text:span text:style-name="T100">(“</text:span><text:span text:style-name="T101">lights in the firmament</text:span><text:span text:style-name="T102"> </text:span><text:span text:style-name="T103">[heaven]</text:span><text:span text:style-name="T102"> </text:span><text:span text:style-name="T101">of the heaven</text:span><text:span text:style-name="T100">” </text:span><text:span text:style-name="T104">Gen</text:span><text:span text:style-name="T105">esis</text:span><text:span text:style-name="T104"> 1:15</text:span><text:span text:style-name="T100">) </text:span>are (<text:span text:style-name="T106">tou aitheros</text:span><text:span text:style-name="T107">; </text:span>outer space).</text:p>
        </text:list-item>
        <text:list-item>
          <text:p text:style-name="P38">The “<text:span text:style-name="T99">heaven</text:span> [singular] <text:span text:style-name="T99">of heavens</text:span> [plural; <text:span text:style-name="T108">the sky and outer space</text:span>]” is the same third heaven in <text:span text:style-name="T6">2 Cor</text:span><text:span text:style-name="T105">inthians</text:span><text:span text:style-name="T6"> 12:2</text:span> which of course is the abode of God (<text:span text:style-name="T109">Luke 23:43</text:span><text:span text:style-name="T110">, </text:span><text:span text:style-name="T109">Rev</text:span><text:span text:style-name="T105">elation</text:span><text:span text:style-name="T109"> 2:7</text:span>).</text:p>
        </text:list-item>
      </text:list>
      <text:p text:style-name="P39"/>
      <text:p text:style-name="P39"/>
      <text:p text:style-name="P39"/>
      <text:p text:style-name="P39"/>
      <text:p text:style-name="P40"><text:soft-page-break/>The <text:span text:style-name="T88">L</text:span>ooking-<text:span text:style-name="T88">G</text:span>lass is <text:span text:style-name="T88">C</text:span>racking</text:p>
      <text:p text:style-name="P41"/>
      <text:p text:style-name="P41">Let’s see what the commentators have to say about this “<text:span text:style-name="T99">anointed cherub that covereth</text:span>”. <text:span text:style-name="T111">The following is a summary of the prevailing opinions and how we can rule </text:span><text:span text:style-name="T112">each of </text:span><text:span text:style-name="T111">them out as viable </text:span><text:span text:style-name="T113">interpretations</text:span><text:span text:style-name="T111">.</text:span></text:p>
      <text:p text:style-name="P42"/>
      <text:list text:style-name="L4">
        <text:list-item>
          <text:p text:style-name="P43">A Pre-fall Lucifer</text:p>
          <text:list>
            <text:list-item>
              <text:p text:style-name="P44"><text:span text:style-name="T6">Eze</text:span><text:span text:style-name="T114">kiel</text:span><text:span text:style-name="T6"> 28:14</text:span> is present tense.</text:p>
            </text:list-item>
          </text:list>
        </text:list-item>
        <text:list-item>
          <text:p text:style-name="P44"><text:span text:style-name="T78">The cherubim on the Ark</text:span> <text:span text:style-name="T115">(</text:span><text:span text:style-name="T116">Exo</text:span><text:span text:style-name="T114">dus</text:span><text:span text:style-name="T116"> 30:26</text:span><text:span text:style-name="T115">, </text:span><text:span text:style-name="T116">Psa</text:span><text:span text:style-name="T114">lm</text:span><text:span text:style-name="T116"> 80:1</text:span><text:span text:style-name="T115">, </text:span><text:span text:style-name="T116">99:1</text:span><text:span text:style-name="T115">)</text:span></text:p>
          <text:list>
            <text:list-item>
              <text:p text:style-name="P44">There are two cherub’s on the Ark, not one (<text:span text:style-name="T116">Eze</text:span><text:span text:style-name="T114">kiel</text:span><text:span text:style-name="T116"> 28:14</text:span><text:span text:style-name="T115"> </text:span><text:span text:style-name="T117">“</text:span><text:span text:style-name="T118">Thou</text:span><text:span text:style-name="T119"> </text:span><text:span text:style-name="T120">[singular] </text:span><text:span text:style-name="T119">ar</text:span><text:span text:style-name="T121">t</text:span><text:span text:style-name="T119"> </text:span><text:span text:style-name="T122">the</text:span><text:span text:style-name="T117"> </text:span><text:span text:style-name="T123">[singular] </text:span><text:span text:style-name="T117">anointed cherub”</text:span>). <text:span text:style-name="T124">One could argue that they are one because they are both part of the Ark but that hypothesis has no support elsewhere in scripture (unlike the vail).</text:span></text:p>
            </text:list-item>
          </text:list>
        </text:list-item>
        <text:list-item>
          <text:p text:style-name="P45">The human king <text:span text:style-name="T125">of Tyrus </text:span><text:span text:style-name="T126">(Ethbaal III) </text:span>as a type of Adam</text:p>
          <text:list>
            <text:list-item>
              <text:p text:style-name="P46">It’s all a metaphorical description of the king of Tyrus and has nothing to do with Satan. <text:span text:style-name="T127">The anointed cherub describes the king’s divinely appointed position and his role as a protector of his people.</text:span> <text:span text:style-name="T128">The description </text:span><text:span text:style-name="T127">using “Eden” and “precious stones” </text:span><text:span text:style-name="T128">is </text:span><text:span text:style-name="T127">simply </text:span><text:span text:style-name="T128">hyperbolic language to describe the peak of Tyrian commercial and political power. </text:span><text:span text:style-name="T129">The mountain is a description of the high, fortified island-city of Tyrus </text:span><text:span text:style-name="T130">which sat above the mainland settlement</text:span><text:span text:style-name="T129">. </text:span><text:span text:style-name="T131">The stones of fire are gemstones that the Tyrians traded.</text:span></text:p>
              <text:list>
                <text:list-item>
                  <text:p text:style-name="P47">While <text:span text:style-name="T132">admittedly </text:span>clever, it’s devoid of the Spirit (<text:span text:style-name="T6">1Cor 2:13,14</text:span>) <text:span text:style-name="T133">and it</text:span> <text:span text:style-name="T133">denies the literal interpretation of scripture thereby exalting man to the position of interpreting God’s word </text:span><text:span text:style-name="T134">which is </text:span><text:span text:style-name="T133">idolatry.</text:span></text:p>
                </text:list-item>
                <text:list-item>
                  <text:p text:style-name="P48">Completely ignores the shift from “prince of Tyrus” to “king of Tyrus” <text:span text:style-name="T135">and groups them both together.</text:span></text:p>
                </text:list-item>
              </text:list>
            </text:list-item>
          </text:list>
        </text:list-item>
        <text:list-item>
          <text:p text:style-name="P49">The king of Tyrus as the guardian of the sanctuary</text:p>
          <text:list>
            <text:list-item>
              <text:p text:style-name="P50">Some take the Hebrew meaning of “covereth” (<text:span text:style-name="T99">sakak</text:span>) which is “hedging/protecting” (while completely ignoring the English meaning) and suggest that the king of Tyrus saw himself (or was intended to be) a guardian of the religious or economic stability of the region <text:span text:style-name="T136">much like the cherubim</text:span><text:span text:style-name="T137">s</text:span><text:span text:style-name="T136"> that guarded the way to the tree of life or covered the mercy seat. </text:span><text:span text:style-name="T138">T</text:span><text:span text:style-name="T136">he iniquity found in him, according to this view, was the perversion of this protective role </text:span><text:span text:style-name="T139">by</text:span><text:span text:style-name="T136"> self-deification (</text:span><text:span text:style-name="T140">Ezekiel 28:2</text:span><text:span text:style-name="T136">).</text:span></text:p>
              <text:list>
                <text:list-item>
                  <text:p text:style-name="P51">Again, it’s quite clever, but it has the same problem<text:span text:style-name="T141">s</text:span> the previous <text:span text:style-name="T142">interpretation</text:span> did <text:span text:style-name="T141">in addition to</text:span> both <text:span text:style-name="T141">of them </text:span>lack<text:span text:style-name="T141">ing</text:span> support elsewhere in scripture (the interpretation<text:span text:style-name="T141">s</text:span> start and end where <text:span text:style-name="T141">they</text:span> began <text:span text:style-name="T143">which is a dead end unless we likewise twist scripture elsewhere </text:span><text:span text:style-name="T144">to say what it doesn’t say</text:span>).</text:p>
                </text:list-item>
              </text:list>
            </text:list-item>
          </text:list>
        </text:list-item>
      </text:list>
      <text:p text:style-name="P52"/>
      <text:p text:style-name="P52"/>
      <text:p text:style-name="P52"/>
      <text:p text:style-name="Horizontal_20_Line"/>
      <text:p text:style-name="P53"/>
      <text:p text:style-name="P53"/>
      <text:p text:style-name="P53"><text:span text:style-name="T145">T</text:span>aking the <text:span text:style-name="T88">P</text:span>ath that <text:span text:style-name="T88">L</text:span>eads <text:span text:style-name="T88">B</text:span><text:span text:style-name="T146">ackward</text:span></text:p>
      <text:p text:style-name="P54"/>
      <text:p text:style-name="P55"><text:span text:style-name="T147">A Cherub (singular) is only </text:span><text:span text:style-name="T148">explicitly </text:span><text:span text:style-name="T147">written of in a total of </text:span><text:span text:style-name="T149">nineteen</text:span><text:span text:style-name="T147"> verses (excluding the two </text:span><text:span text:style-name="T150">that are </text:span><text:span text:style-name="T151">place names</text:span><text:span text:style-name="T147"> in </text:span><text:span text:style-name="T152">both</text:span><text:span text:style-name="T147"> </text:span><text:span text:style-name="T153">Ezr</text:span><text:span text:style-name="T154">a</text:span><text:span text:style-name="T153"> 2:59</text:span> and <text:span text:style-name="T153">Neh</text:span><text:span text:style-name="T154">emiah</text:span><text:span text:style-name="T153"> 7:61</text:span>; see table above <text:span text:style-name="T155">for the full list</text:span><text:span text:style-name="T147">).</text:span></text:p>
      <text:p text:style-name="P55"/>
      <text:p text:style-name="P55"><text:span text:style-name="T156">Of those </text:span><text:span text:style-name="T149">nineteen</text:span><text:span text:style-name="T156"> only </text:span><text:span text:style-name="T149">seven</text:span><text:span text:style-name="T156"> of them are </text:span><text:span text:style-name="T157">a</text:span><text:span text:style-name="T156">bout a singular cherub </text:span><text:span text:style-name="T155">(</text:span><text:span text:style-name="T158">2 Sa</text:span><text:span text:style-name="T159">muel</text:span><text:span text:style-name="T158"> 22:11</text:span><text:span text:style-name="T160">, </text:span><text:span text:style-name="T158">Psa</text:span><text:span text:style-name="T159">lm</text:span><text:span text:style-name="T158"> 18:10</text:span><text:span text:style-name="T160">, </text:span><text:span text:style-name="T161">Eze</text:span><text:span text:style-name="T159">kiel</text:span><text:span text:style-name="T161"> 9:3</text:span><text:span text:style-name="T162">, </text:span><text:span text:style-name="T163">10:2,</text:span><text:span text:style-name="T164">4</text:span><text:span text:style-name="T165">, </text:span><text:span text:style-name="T164">28:14,</text:span><text:span text:style-name="T166">16</text:span><text:span text:style-name="T155">).</text:span></text:p>
      <text:p text:style-name="P52"/>
      <text:p text:style-name="P56">Of those <text:span text:style-name="T149">seven</text:span> only <text:span text:style-name="T149">two</text:span> are not in the book of <text:span text:style-name="T6">Ezekiel</text:span>. <text:span text:style-name="T167">And those </text:span><text:span text:style-name="T149">two</text:span><text:span text:style-name="T167"> are parallel passages. </text:span><text:span text:style-name="T168">Interesting.</text:span></text:p>
      <text:p text:style-name="P52"/>
      <text:p text:style-name="P52"/>
      <text:p text:style-name="P52"/>
      <text:p text:style-name="P52"/>
      <text:p text:style-name="P57"><text:soft-page-break/><text:span text:style-name="T169">The Garden of Live </text:span><text:span text:style-name="T170">F</text:span><text:span text:style-name="T169">lowers</text:span></text:p>
      <text:p text:style-name="P5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8"><text:span text:style-name="T6">2 Samuel 22:11<text:line-break/></text:span>And he rode <text:span text:style-name="T78">upon</text:span> <text:span text:style-name="T171">a</text:span><text:span text:style-name="T10"> cherub</text:span>, and did fly: and he was seen <text:span text:style-name="T78">upon</text:span> <text:span text:style-name="T171">the</text:span><text:span text:style-name="T10"> wings of the wind</text:span>.</text:p>
            <text:p text:style-name="P59"/>
            <text:p text:style-name="P58"><text:span text:style-name="T6">Psalms 18:10</text:span><text:line-break/>And he rode <text:span text:style-name="T78">upon</text:span> <text:span text:style-name="T171">a</text:span><text:span text:style-name="T10"> cherub</text:span>, and did fly: yea, he did fly <text:span text:style-name="T78">upon</text:span> <text:span text:style-name="T171">the</text:span><text:span text:style-name="T10"> wings of the wind</text:span>.</text:p>
          </table:table-cell>
        </table:table-row>
      </table:table>
      <text:list text:style-name="L5">
        <text:list-item>
          <text:p text:style-name="P60"><text:span text:style-name="T172">When </text:span><text:span text:style-name="T173">God the Father </text:span><text:span text:style-name="T172">rescued</text:span><text:span text:style-name="T173"> God the Son after </text:span><text:span text:style-name="T172">H</text:span><text:span text:style-name="T173">is crucifixion, </text:span><text:span text:style-name="T172">He rode upon </text:span><text:span text:style-name="T174">a</text:span><text:span text:style-name="T172"> </text:span><text:span text:style-name="T175">[singular] </text:span><text:span text:style-name="T172">cherub.</text:span></text:p>
        </text:list-item>
      </text:list>
      <text:p text:style-name="P61"/>
      <table:table table:name="Table6" table:style-name="Table6">
        <table:table-column table:style-name="Table6.A"/>
        <table:table-row>
          <table:table-cell table:style-name="Table6.A1" office:value-type="string">
            <text:p text:style-name="P62">Exodus 24:10</text:p>
            <text:p text:style-name="P63">And they saw the God of Israel: and <text:span text:style-name="T10">there was under his feet</text:span> as it were a paved work of a sapphire stone, and <text:span text:style-name="T10">as it were the body of heaven in his clearness</text:span>.</text:p>
          </table:table-cell>
        </table:table-row>
        <table:table-row>
          <table:table-cell table:style-name="Table6.A2" office:value-type="string">
            <text:p text:style-name="P63"><text:span text:style-name="T6">Isaiah 66:1</text:span><text:line-break/>Thus saith the LORD, <text:span text:style-name="T176">The heaven is my throne</text:span><text:span text:style-name="T177">, and </text:span><text:span text:style-name="T176">the earth is my footstool</text:span><text:span text:style-name="T177">: where is the house that ye build unto me? and where is the place of my rest?</text:span></text:p>
          </table:table-cell>
        </table:table-row>
        <table:table-row>
          <table:table-cell table:style-name="Table6.A2" office:value-type="string">
            <text:p text:style-name="P63"><text:span text:style-name="T6">Matthew 5:34-35</text:span><text:line-break/><text:span text:style-name="T8">34</text:span> <text:span text:style-name="T177">But I say unto you, Swear not at all; neither by </text:span><text:span text:style-name="T176">heaven</text:span><text:span text:style-name="T177">; for it </text:span><text:span text:style-name="T176">is God's throne</text:span><text:span text:style-name="T177">: </text:span><text:span text:style-name="T8">35</text:span> <text:span text:style-name="T177">Nor by </text:span><text:span text:style-name="T176">the earth</text:span><text:span text:style-name="T177">; for it </text:span><text:span text:style-name="T176">is his footstool</text:span><text:span text:style-name="T177">: neither by Jerusalem; for it is the city of the great King.</text:span></text:p>
          </table:table-cell>
        </table:table-row>
        <table:table-row>
          <table:table-cell table:style-name="Table6.A2" office:value-type="string">
            <text:p text:style-name="P63"><text:span text:style-name="T178">1 Ch</text:span><text:span text:style-name="T179">ronicles</text:span><text:span text:style-name="T178"> 28:2, Psa</text:span><text:span text:style-name="T179">lm</text:span><text:span text:style-name="T178"> </text:span><text:span text:style-name="T180">11:4, </text:span><text:span text:style-name="T178">132:7, </text:span><text:span text:style-name="T181">Matthew 23:22</text:span>, <text:span text:style-name="T6">Acts 7:49</text:span></text:p>
          </table:table-cell>
        </table:table-row>
      </table:table>
      <text:list text:style-name="L6">
        <text:list-item>
          <text:p text:style-name="P64">It’s abundantly <text:span text:style-name="T99">clear</text:span> where God’s throne is and where his footstool is.</text:p>
        </text:list-item>
      </text:list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6">Ezekiel 1:5</text:span> (<text:span text:style-name="T182">13,15,19</text:span>)<text:line-break/>Also out of the midst thereof came the likeness of <text:span text:style-name="T10">four living creatures</text:span>. And this was their appearance; they had the likeness of a man.</text:p>
          </table:table-cell>
        </table:table-row>
        <table:table-row>
          <table:table-cell table:style-name="Table8.A2" office:value-type="string">
            <text:p text:style-name="Table_20_Contents"><text:span text:style-name="T6">Ezekiel 1:22</text:span> (<text:span text:style-name="T183">20,21</text:span>)<text:line-break/>And the likeness of the firmament upon the head<text:span text:style-name="T78">s</text:span> of the <text:span text:style-name="T10">living creature</text:span> was as the colour of the terrible crystal, stretched forth over their head<text:span text:style-name="T78">s</text:span> above.</text:p>
          </table:table-cell>
        </table:table-row>
        <table:table-row>
          <table:table-cell table:style-name="Table8.A2" office:value-type="string">
            <text:p text:style-name="Table_20_Contents"><text:span text:style-name="T6">Ezekiel 10:20</text:span><text:line-break/>This is the <text:span text:style-name="T10">living creature</text:span> that I saw under the God of Israel by the river of Chebar; and I knew that they were the <text:span text:style-name="T10">cherubims</text:span>.</text:p>
          </table:table-cell>
        </table:table-row>
      </table:table>
      <text:list text:style-name="L7">
        <text:list-item>
          <text:p text:style-name="P65">The “<text:span text:style-name="T184">four living creatures</text:span><text:span text:style-name="T185">” (cherubims) </text:span>are all referred to as <text:span text:style-name="T185">a singular </text:span>“<text:span text:style-name="T184">l</text:span><text:span text:style-name="T99">iving creature</text:span>”.</text:p>
        </text:list-item>
      </text:list>
      <text:p text:style-name="P6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6"><text:span text:style-name="T6">Ezekiel 10:</text:span><text:span text:style-name="T186">1</text:span><text:span text:style-name="T6">-</text:span><text:span text:style-name="T187">4</text:span> (<text:span text:style-name="T188">1:22-26</text:span>; <text:span text:style-name="T189">9:3</text:span>)<text:line-break/><text:span text:style-name="T190">1</text:span><text:span text:style-name="T191"> </text:span><text:span text:style-name="T192">Then I looked, and, behold, in the firmament that was above the head of the cherubims there appeared over them as it were a sapphire stone </text:span><text:span text:style-name="T193">Exo 24:10, </text:span><text:span text:style-name="T194">Eze 1:22,</text:span><text:span text:style-name="T193">26, 10:1, </text:span><text:span text:style-name="T195">Rev 4:6</text:span><text:span text:style-name="T192">, as the appearance of the likeness of a throne. </text:span><text:span text:style-name="T196">2</text:span><text:span text:style-name="T192"> And he spake unto the man clothed with linen </text:span><text:span text:style-name="T197">Eze 9:</text:span><text:span text:style-name="T198">2,</text:span><text:span text:style-name="T197">4</text:span><text:span text:style-name="T192">, and said, Go in between the wheels </text:span><text:span text:style-name="T199">Eze 1:18</text:span><text:span text:style-name="T192">, even under </text:span><text:span text:style-name="T200">the cherub</text:span><text:span text:style-name="T192">, and fill thine hand with coals of fire from between the cherubims, and scatter them over the city. And he went in in my sight. </text:span><text:span text:style-name="T196">3</text:span><text:span text:style-name="T192"> Now the cherubims stood on the right side of the house, when the man went in; and the cloud filled the inner court. </text:span><text:span text:style-name="T196">4</text:span><text:span text:style-name="T192"> Then the glory of the LORD went up from </text:span><text:span text:style-name="T200">the cherub</text:span><text:span text:style-name="T192">, and stood over the threshold of the house; and the house was filled with the cloud, and the court was full of the brightness of the LORD'S glory.</text:span></text:p>
          </table:table-cell>
        </table:table-row>
      </table:table>
      <text:list text:style-name="L8">
        <text:list-item>
          <text:p text:style-name="P67">Above the “living creature/cherubims” <text:span text:style-name="T201">(and the </text:span><text:span text:style-name="T202">dreadfully high </text:span><text:span text:style-name="T201">wheels beside them and the </text:span><text:span text:style-name="T203">coals of </text:span><text:span text:style-name="T201">fire between them) </text:span>is the firmament/heaven.</text:p>
        </text:list-item>
        <text:list-item>
          <text:p text:style-name="P68">The singular “<text:span text:style-name="T99">living creature</text:span>” (which is below the throne in the firmament) is referred to as “<text:span text:style-name="T99">the cherub</text:span>”.</text:p>
        </text:list-item>
        <text:list-item>
          <text:p text:style-name="P69">This<text:span text:style-name="T204"> </text:span>is <text:span text:style-name="T205">very likely </text:span>the cherub that the LORD rode upon in <text:span text:style-name="T6">2 Sa</text:span><text:span text:style-name="T206">muel</text:span><text:span text:style-name="T6"> 22:11</text:span> &amp; <text:span text:style-name="T6">Psa</text:span><text:span text:style-name="T206">lm</text:span><text:span text:style-name="T6"> 18:10</text:span>.</text:p>
        </text:list-item>
      </text:list>
      <text:p text:style-name="Standard"/>
      <text:p text:style-name="Standard"/>
      <text:p text:style-name="Standard"/>
      <text:p text:style-name="P70"><text:soft-page-break/><text:span text:style-name="T207">F</text:span><text:span text:style-name="T208">inding the </text:span><text:span text:style-name="T209">E</text:span><text:span text:style-name="T208">ig</text:span><text:span text:style-name="T210">hth</text:span><text:span text:style-name="T208"> </text:span><text:span text:style-name="T209">S</text:span><text:span text:style-name="T208">quare</text:span>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6">Ephesians 2:2</text:span> (<text:span text:style-name="T6">5:6</text:span>, <text:span text:style-name="T211">John 3:18</text:span>)<text:line-break/>Wherein in time past ye walked according to the course of this world, according to <text:span text:style-name="T10">the prince of the power of the air</text:span>, the <text:span text:style-name="T212">spirit</text:span> <text:span text:style-name="T78">that now worketh in</text:span> the children of disobedience:</text:p>
          </table:table-cell>
        </table:table-row>
      </table:table>
      <text:list text:style-name="L9">
        <text:list-item>
          <text:p text:style-name="P71"><text:span text:style-name="T213">References to spiritual creatures in the air</text:span>: <text:span text:style-name="T6">Job 28:21</text:span>, <text:span text:style-name="T6">Ma</text:span><text:span text:style-name="T214">t</text:span><text:span text:style-name="T6">t</text:span><text:span text:style-name="T214">hew</text:span><text:span text:style-name="T6"> 13:4</text:span>, <text:span text:style-name="T6">Mark 4:4,32</text:span>, <text:span text:style-name="T6">Luke 8:5</text:span>, <text:span text:style-name="T6">13:19</text:span> <text:span text:style-name="T213">(</text:span><text:span text:style-name="T215">cf. </text:span><text:span text:style-name="T216">Mat</text:span><text:span text:style-name="T214">thew</text:span><text:span text:style-name="T216"> 13:24-30</text:span><text:span text:style-name="T213">).</text:span></text:p>
        </text:list-item>
        <text:list-item>
          <text:p text:style-name="P72">Lucifer is <text:span text:style-name="T217">called </text:span>the prince/chief/captain/first/<text:span text:style-name="T218">commander/ruler</text:span> of “<text:span text:style-name="T219">the power</text:span><text:span text:style-name="T218"> </text:span><text:span text:style-name="T220">[authority/jurisdiction]</text:span><text:span text:style-name="T218"> </text:span><text:span text:style-name="T219">of the air</text:span><text:span text:style-name="T218"> </text:span><text:span text:style-name="T221">[</text:span><text:span text:style-name="T222">tou aeros/</text:span><text:span text:style-name="T221">atmosphere/the covering of the earth]</text:span><text:span text:style-name="T218">”.</text:span></text:p>
          <text:list>
            <text:list-item>
              <text:p text:style-name="P73"><text:span text:style-name="T223">A</text:span>ir (<text:span text:style-name="T99">tou aeros</text:span>) here is analogous to “the [first] heaven” or “the firmament” (the sky).</text:p>
            </text:list-item>
          </text:list>
        </text:list-item>
        <text:list-item>
          <text:p text:style-name="P74">Thus, <text:span text:style-name="T224">physically, </text:span>Lucifer rules over the atmosphere that covers the earth, <text:span text:style-name="T225">for the time being (</text:span><text:span text:style-name="T226">Isaiah 34:4</text:span><text:span text:style-name="T225">, </text:span><text:span text:style-name="T226">Revelation 6:13,14</text:span><text:span text:style-name="T225">)</text:span></text:p>
        </text:list-item>
        <text:list-item>
          <text:p text:style-name="P75">That same <text:span text:style-name="T78">spirit</text:span> is said to work <text:span text:style-name="T78">in</text:span><text:span text:style-name="T227"> </text:span>(present tense), <text:span text:style-name="T228">as</text:span><text:span text:style-name="T227"> in inside</text:span> <text:span text:style-name="T228">of, </text:span>the children of disobedience.</text:p>
        </text:list-item>
      </text:list>
      <text:p text:style-name="P76"/>
      <text:p text:style-name="P76"/>
      <text:p text:style-name="P76"/>
      <text:p text:style-name="P77">The Gnat’s Small Whisper</text:p>
      <text:p text:style-name="P78"/>
      <table:table table:name="Table7" table:style-name="Table7">
        <table:table-column table:style-name="Table7.A"/>
        <table:table-row>
          <table:table-cell table:style-name="Table7.A1" office:value-type="string">
            <text:p text:style-name="P79"><text:span text:style-name="T6">2 Corinthians 4:3-4</text:span><text:line-break/><text:span text:style-name="T8">3</text:span> But if our gospel be hid, it is hid to them that are lost: <text:span text:style-name="T8">4</text:span> <text:span text:style-name="T78">In</text:span> whom <text:span text:style-name="T10">the </text:span><text:span text:style-name="T212">god</text:span><text:span text:style-name="T10"> of this world hath blinded the minds</text:span> of them which believe not, lest the light of the glorious gospel of Christ, who is the image of God, should shine unto them.</text:p>
          </table:table-cell>
        </table:table-row>
        <table:table-row>
          <table:table-cell table:style-name="Table7.A2" office:value-type="string">
            <text:p text:style-name="P79"><text:span text:style-name="T6">1 Samuel 28:</text:span><text:span text:style-name="T229">9,</text:span><text:span text:style-name="T6">13</text:span><text:line-break/><text:span text:style-name="T8">9</text:span> And the woman said unto him, <text:span text:style-name="T230">Behold, thou knowest what Saul hath done, how he hath cut off </text:span><text:span text:style-name="T231">those that have familiar spirits</text:span><text:span text:style-name="T230">, and the wizards, out of the land: wherefore then layest thou a snare for my life, to cause me to die?</text:span><text:line-break/></text:p>
            <text:p text:style-name="P79"><text:span text:style-name="T232">13</text:span><text:span text:style-name="T233"> </text:span>And the king said unto her, <text:span text:style-name="T230">Be not afraid: for what sawest thou?</text:span> And the woman said unto Saul, <text:span text:style-name="T231">I saw </text:span><text:span text:style-name="T234">gods</text:span><text:span text:style-name="T231"> ascending out of the earth</text:span><text:span text:style-name="T230">.</text:span></text:p>
          </table:table-cell>
        </table:table-row>
      </table:table>
      <text:list xml:id="list978805217" text:style-name="L10">
        <text:list-item>
          <text:p text:style-name="P80">The word “god/gods” is sometimes used to describe spirits.</text:p>
        </text:list-item>
        <text:list-item>
          <text:p text:style-name="P81"><text:span text:style-name="T235">The “god of this world” is the same “spirit” of </text:span><text:span text:style-name="T236">Eph</text:span><text:span text:style-name="T237">esians</text:span><text:span text:style-name="T236"> 2:2</text:span> <text:span text:style-name="T238">and the same “man” of </text:span><text:span text:style-name="T239">Isa</text:span><text:span text:style-name="T237">iah</text:span><text:span text:style-name="T239"> 14:16,17</text:span>.</text:p>
        </text:list-item>
      </text:list>
      <text:p text:style-name="P82"/>
      <text:p text:style-name="P82"/>
      <text:p text:style-name="P76"/>
      <text:p text:style-name="P83">Waking the Dreamer</text:p>
      <text:p text:style-name="P84"/>
      <table:table table:name="Table4" table:style-name="Table4">
        <table:table-column table:style-name="Table4.A"/>
        <table:table-row>
          <table:table-cell table:style-name="Table4.A1" office:value-type="string">
            <text:p text:style-name="P85"><text:span text:style-name="T6">Isaiah 25:6-8</text:span><text:line-break/><text:span text:style-name="T8">6</text:span> And in this mountain shall the LORD of hosts make unto all people a feast of fat things, a feast of wines on the lees, of fat things full of marrow, of wines on the lees well refined. <text:span text:style-name="T8">7</text:span> And <text:span text:style-name="T10">he will destroy in this mountain</text:span><text:span text:style-name="T240"> </text:span><text:span text:style-name="T241">Isa 24:23</text:span><text:span text:style-name="T240"> </text:span><text:span text:style-name="T10">the face of the covering cast over all people</text:span>, and <text:span text:style-name="T10">the vail that is spread over all nations</text:span>. <text:span text:style-name="T8">8</text:span> He will swallow up death in victory <text:span text:style-name="T242">1Cor 15:26</text:span>; and the Lord GOD will <text:span text:style-name="T15">wipe away tears from off </text:span><text:span text:style-name="T243">all</text:span><text:span text:style-name="T15"> faces</text:span>; and the rebuke of his people shall he take away from off all the earth: for the LORD hath spoken it.</text:p>
          </table:table-cell>
        </table:table-row>
        <table:table-row>
          <table:table-cell table:style-name="Table4.A2" office:value-type="string">
            <text:p text:style-name="P86"><text:span text:style-name="T6">Revelation 21:4</text:span> (the new heaven and earth; <text:span text:style-name="T244">not </text:span><text:span text:style-name="T245">Rev</text:span><text:span text:style-name="T246">elation</text:span><text:span text:style-name="T245"> 7:17</text:span><text:span text:style-name="T244"> the tribulation saints</text:span>)<text:line-break/>And God shall <text:span text:style-name="T15">wipe away all tears from their eyes</text:span>; and there shall be no more death, neither sorrow, nor crying, neither shall there be any more pain: for the former things are passed away.</text:p>
          </table:table-cell>
        </table:table-row>
      </table:table>
      <text:list text:style-name="L11">
        <text:list-item>
          <text:p text:style-name="P87"><text:span text:style-name="T247">The time period for </text:span><text:span text:style-name="T248">Isa</text:span><text:span text:style-name="T249">iah</text:span><text:span text:style-name="T248"> 25:6,</text:span><text:span text:style-name="T250">7</text:span> (not <text:span text:style-name="T251">8</text:span>) <text:span text:style-name="T247">is </text:span><text:span text:style-name="T248">Revelation 19</text:span> so we know this occurs before the new heaven and the new earth <text:span text:style-name="T252">meaning it is not a physical destruction of the atmosphere of Earth.</text:span></text:p>
        </text:list-item>
        <text:list-item>
          <text:p text:style-name="P87"><text:span text:style-name="T253">Something spiritual that is a covering cast over all people will be destroyed </text:span><text:span text:style-name="T254">(</text:span><text:span text:style-name="T255">Heb</text:span><text:span text:style-name="T256">rews</text:span><text:span text:style-name="T255"> 2:14</text:span><text:span text:style-name="T257">)</text:span><text:span text:style-name="T253">.</text:span></text:p>
        </text:list-item>
        <text:list-item>
          <text:p text:style-name="P88">Interestingly, <text:span text:style-name="T258">the</text:span> “covering” is also called a “vail” <text:span text:style-name="T259">(</text:span><text:span text:style-name="T260">Exo</text:span><text:span text:style-name="T261">dus</text:span><text:span text:style-name="T260"> 26:31,33,35</text:span><text:span text:style-name="T259">).</text:span></text:p>
        </text:list-item>
      </text:list>
      <text:p text:style-name="P89"/>
      <text:p text:style-name="P90"/>
      <text:p text:style-name="P91"><text:soft-page-break/><text:span text:style-name="T208">The Wood Where Things Have No Names</text:span></text:p>
      <text:p text:style-name="P92"/>
      <table:table table:name="Table2" table:style-name="Table2">
        <table:table-column table:style-name="Table2.A"/>
        <table:table-row>
          <table:table-cell table:style-name="Table2.A1" office:value-type="string">
            <text:p text:style-name="P93"><text:span text:style-name="T6">Isaiah 60:1-3</text:span><text:line-break/><text:span text:style-name="T8">1</text:span> Arise, shine; for thy light is come, and the glory of the LORD is risen upon thee. <text:span text:style-name="T8">2</text:span> For, behold, <text:span text:style-name="T10">the darkness shall cover the earth, and gross darkness the people</text:span>: but <text:span text:style-name="T15">the LORD shall arise upon thee</text:span>, and his glory shall be seen upon thee. <text:span text:style-name="T8">3</text:span> And the Gentiles shall come to thy light, and kings to the brightness of thy rising.</text:p>
          </table:table-cell>
        </table:table-row>
        <table:table-row>
          <table:table-cell table:style-name="Table2.A2" office:value-type="string">
            <text:p text:style-name="Table_20_Contents"><text:span text:style-name="T6">John 1:4-5</text:span><text:line-break/><text:span text:style-name="T8">4</text:span> In him was life; and the life was the light of men. <text:span text:style-name="T8">5</text:span> And <text:span text:style-name="T15">the light shineth in darkness</text:span>; and the darkness comprehended it not.</text:p>
          </table:table-cell>
        </table:table-row>
        <table:table-row>
          <table:table-cell table:style-name="Table2.A2" office:value-type="string">
            <text:p text:style-name="Table_20_Contents"><text:span text:style-name="T6">John 8:12</text:span><text:line-break/>Then spake Jesus again unto them, saying, <text:span text:style-name="T177">I am the light of the world: he that followeth me shall not walk in </text:span><text:span text:style-name="T176">darkness</text:span><text:span text:style-name="T177">, but shall have the light of life.</text:span></text:p>
          </table:table-cell>
        </table:table-row>
        <table:table-row>
          <table:table-cell table:style-name="Table2.A2" office:value-type="string">
            <text:p text:style-name="Table_20_Contents"><text:span text:style-name="T6">John 12:46</text:span><text:line-break/><text:span text:style-name="T177">I am come a light into the world, that whosoever believeth on me should not abide in </text:span><text:span text:style-name="T176">darkness</text:span><text:span text:style-name="T177">.</text:span></text:p>
          </table:table-cell>
        </table:table-row>
        <table:table-row>
          <table:table-cell table:style-name="Table2.A2" office:value-type="string">
            <text:p text:style-name="Table_20_Contents"><text:span text:style-name="T6">Ephesians 4:17-18</text:span><text:line-break/><text:span text:style-name="T8">17</text:span> This I say therefore, and testify in the Lord, that ye henceforth walk not as other Gentiles walk, in the vanity of their mind, <text:span text:style-name="T8">18</text:span> <text:span text:style-name="T18">Having </text:span><text:span text:style-name="T10">the understanding darkened</text:span>, being alienated from the life of God through <text:span text:style-name="T10">the ignorance that is in them</text:span>, because of <text:span text:style-name="T10">the blindness of their heart</text:span>:</text:p>
          </table:table-cell>
        </table:table-row>
        <table:table-row>
          <table:table-cell table:style-name="Table2.A2" office:value-type="string">
            <text:p text:style-name="Table_20_Contents"><text:span text:style-name="T6">1 John 2:10-11</text:span><text:line-break/><text:span text:style-name="T8">10</text:span> He that loveth his brother <text:span text:style-name="T10">abideth in the light</text:span>, and there is none occasion of stumbling in him. <text:span text:style-name="T8">11</text:span> But he that hateth his brother <text:span text:style-name="T10">is in darkness</text:span>, and <text:span text:style-name="T10">walketh in darkness</text:span>, and knoweth not whither he goeth, because <text:span text:style-name="T10">that darkness hath blinded his eyes</text:span>.</text:p>
          </table:table-cell>
        </table:table-row>
      </table:table>
      <text:list text:continue-list="list978805217" text:style-name="L10">
        <text:list-item>
          <text:p text:style-name="P94"><text:span text:style-name="T262">The</text:span> “covering/vail” <text:span text:style-name="T262">of </text:span><text:span text:style-name="T263">Is</text:span><text:span text:style-name="T264">a</text:span><text:span text:style-name="T263">iah 25:6-8</text:span><text:span text:style-name="T262"> </text:span>covers the hearts/minds of people.</text:p>
        </text:list-item>
        <text:list-item>
          <text:p text:style-name="P95">Spiritual blindness <text:span text:style-name="T265">affects the </text:span><text:span text:style-name="T266">understanding </text:span><text:span text:style-name="T267">and</text:span><text:span text:style-name="T266"> </text:span><text:span text:style-name="T268">the heart/mind</text:span><text:span text:style-name="T265"> (</text:span><text:span text:style-name="T269">2 Cor</text:span><text:span text:style-name="T270">inthians</text:span><text:span text:style-name="T269"> </text:span><text:span text:style-name="T271">3:14, </text:span><text:span text:style-name="T269">4:4</text:span><text:span text:style-name="T265">).</text:span></text:p>
        </text:list-item>
      </text:list>
      <text:p text:style-name="P76"/>
      <text:p text:style-name="P76"/>
      <text:p text:style-name="P96">The Old Sheep’s Shop</text:p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span text:style-name="T6">John 8:43-47</text:span> (cf. <text:span text:style-name="T272">Matthew 13:14,15</text:span>, <text:span text:style-name="T273">Isaiah 6:9,10</text:span>)<text:line-break/><text:span text:style-name="T8">43</text:span> <text:span text:style-name="T177">Why do </text:span><text:span text:style-name="T176">ye not understand</text:span><text:span text:style-name="T177"> my speech? even </text:span><text:span text:style-name="T176">because ye cannot hear my word</text:span><text:span text:style-name="T177">. </text:span><text:span text:style-name="T8">44</text:span> <text:span text:style-name="T177">Ye are of your father the devil, and the lusts of your father ye will do. He was a murderer from the beginning, and abode not in the truth, because </text:span><text:span text:style-name="T274">there is no truth in him</text:span><text:span text:style-name="T177">. When he speaketh a lie, he speaketh of his own: for he is a liar, and the father of it. </text:span><text:span text:style-name="T8">45</text:span> <text:span text:style-name="T177">And because I tell you the truth, </text:span><text:span text:style-name="T176">ye believe me not</text:span><text:span text:style-name="T177">. </text:span><text:span text:style-name="T8">46</text:span> <text:span text:style-name="T177">Which of you convinceth me of sin? And if I say the truth, why do ye not believe me? </text:span><text:span text:style-name="T8">47</text:span> <text:span text:style-name="T177">He that is of God heareth God's words: </text:span><text:span text:style-name="T176">ye therefore hear them not</text:span><text:span text:style-name="T177">, because ye are not of God.</text:span></text:p>
          </table:table-cell>
        </table:table-row>
      </table:table>
      <text:list text:style-name="L12">
        <text:list-item>
          <text:p text:style-name="P97">Those who are spiritually blind cannot:</text:p>
          <text:list>
            <text:list-item>
              <text:p text:style-name="P97"><text:span text:style-name="T275">U</text:span>nderstand the word of God.</text:p>
            </text:list-item>
            <text:list-item>
              <text:p text:style-name="P97"><text:span text:style-name="T275">H</text:span>ear the word of God.</text:p>
            </text:list-item>
            <text:list-item>
              <text:p text:style-name="P97"><text:span text:style-name="T275">B</text:span>elieve the word of God.</text:p>
            </text:list-item>
          </text:list>
        </text:list-item>
        <text:list-item>
          <text:p text:style-name="P98"><text:span text:style-name="T276">Lucifer cannot </text:span>speak the word of God.</text:p>
        </text:list-item>
      </text:list>
      <text:p text:style-name="P76"/>
      <text:p text:style-name="P99">Moreover,</text:p>
      <text:p text:style-name="P99"/>
      <text:list text:continue-numbering="true" text:style-name="L12">
        <text:list-item>
          <text:p text:style-name="P100">Cannot <text:span text:style-name="T277">(present </text:span><text:span text:style-name="T278">indicative </text:span><text:span text:style-name="T277">tense) </text:span>see the kingdom of God (<text:span text:style-name="T6">John 3:3</text:span>, <text:span text:style-name="T279">Luke 17:21</text:span>).</text:p>
        </text:list-item>
        <text:list-item>
          <text:p text:style-name="P101"><text:span text:style-name="T280">Are w</text:span>alking in darkness (<text:span text:style-name="T6">1 John 2:11</text:span>, <text:span text:style-name="T6">12:35</text:span>).</text:p>
        </text:list-item>
        <text:list-item>
          <text:p text:style-name="P102"><text:span text:style-name="T280">Experience t</text:span>ribulation and anguish (<text:span text:style-name="T6">Romans 2:8,9</text:span>).</text:p>
        </text:list-item>
        <text:list-item>
          <text:p text:style-name="P103"><text:span text:style-name="T281">Cannot u</text:span>nderstand the mysteries of the kingdom of heaven (<text:span text:style-name="T6">Matthew 13:11,12</text:span>).</text:p>
        </text:list-item>
        <text:list-item>
          <text:p text:style-name="P104">All the curses in <text:span text:style-name="T6">Deu</text:span><text:span text:style-name="T282">teronomy</text:span><text:span text:style-name="T6"> 28</text:span>? (<text:span text:style-name="T6">John 7:49</text:span>, <text:span text:style-name="T6">Galatians 3:10</text:span>).</text:p>
        </text:list-item>
        <text:list-item>
          <text:p text:style-name="P105">And more.</text:p>
        </text:list-item>
      </text:list>
      <text:p text:style-name="P106"><text:soft-page-break/><text:span text:style-name="T283">The physical </text:span><text:span text:style-name="T284">as </text:span><text:span text:style-name="T283">a shadow of the spiritual </text:span><text:span text:style-name="T285">reality</text:span></text:p>
      <text:p text:style-name="P107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6">1 Corinthians 3:16</text:span><text:line-break/>Know ye not that <text:span text:style-name="T10">ye are the temple of God</text:span>, and that the Spirit of God dwelleth in you?</text:p>
            <text:p text:style-name="Table_20_Contents"/>
            <text:p text:style-name="Table_20_Contents"><text:span text:style-name="T6">1 Corinthians 6:19</text:span><text:line-break/>What? know ye not that <text:span text:style-name="T10">your body is the temple of the Holy Ghost</text:span> which is in you, which ye have of God, and ye are not your own?</text:p>
          </table:table-cell>
        </table:table-row>
      </table:table>
      <text:list text:style-name="L13">
        <text:list-item>
          <text:p text:style-name="P108">The tabernacle/temple <text:span text:style-name="T286">is a part of the </text:span>shadow of things to come but not the very image of those things <text:span text:style-name="T287">(</text:span><text:span text:style-name="T288">Genesis 1:26,27</text:span><text:span text:style-name="T289">, </text:span><text:span text:style-name="T290">Hebrews 10:1</text:span><text:span text:style-name="T287">).</text:span></text:p>
        </text:list-item>
        <text:list-item>
          <text:p text:style-name="P109">The <text:span text:style-name="T291">covering/</text:span>v<text:span text:style-name="T291">ai</text:span>l<text:span text:style-name="T291"> </text:span>blocks access to the heart/mind of the person.</text:p>
          <text:list>
            <text:list-item>
              <text:p text:style-name="P110">Only the High Priest can enter (<text:span text:style-name="T292">Leviticus 16:2,17,34</text:span><text:span text:style-name="T293">, </text:span><text:span text:style-name="T6">Heb</text:span><text:span text:style-name="T292">rews</text:span><text:span text:style-name="T6"> 3:1, </text:span><text:span text:style-name="T294">1 Pet</text:span><text:span text:style-name="T295">er</text:span><text:span text:style-name="T294"> 1:23</text:span>).</text:p>
            </text:list-item>
          </text:list>
        </text:list-item>
      </text:list>
      <text:p text:style-name="P111"/>
      <text:p text:style-name="P11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2"><text:span text:style-name="T6">2 Corinthians 3:13-16</text:span><text:line-break/><text:span text:style-name="T8">13</text:span> And <text:span text:style-name="T296">not as Moses</text:span><text:span text:style-name="T297"> </text:span><text:span text:style-name="T298">[physical]</text:span>, which put a vail over his face, that the children of Israel could not stedfastly look to the end of that which is abolished: <text:span text:style-name="T8">14</text:span> <text:span text:style-name="T296">But</text:span> <text:span text:style-name="T10">their </text:span><text:span text:style-name="T299">minds</text:span><text:span text:style-name="T10"> were blinded</text:span><text:span text:style-name="T297"> </text:span><text:span text:style-name="T298">[spiritual]</text:span>: for <text:span text:style-name="T18">until this day remaineth the same vail </text:span><text:span text:style-name="T298">[spiritual]</text:span><text:span text:style-name="T18"> untaken away in the reading of the old testament; which vail </text:span><text:span text:style-name="T298">[spiritual]</text:span><text:span text:style-name="T18"> is done away in Christ </text:span><text:span text:style-name="T298">[spiritual rebirth]</text:span><text:span text:style-name="T18">.</text:span> <text:span text:style-name="T8">15</text:span> But even unto this day, when Moses is read, <text:span text:style-name="T15">the vail is upon their </text:span><text:span text:style-name="T299">heart</text:span><text:span text:style-name="T18"> </text:span><text:span text:style-name="T298">[spiritual]</text:span>. <text:span text:style-name="T8">16</text:span> <text:span text:style-name="T15">Nevertheless when it</text:span><text:span text:style-name="T297"> </text:span><text:span text:style-name="T300">[their heart]</text:span><text:span text:style-name="T297"> </text:span><text:span text:style-name="T15">shall turn to the Lord, the vail</text:span><text:span text:style-name="T18"> </text:span><text:span text:style-name="T298">[spiritual]</text:span><text:span text:style-name="T15"> shall be taken away</text:span><text:span text:style-name="T18"> </text:span><text:span text:style-name="T298">[spiritual rebirth]</text:span><text:span text:style-name="T18">.</text:span></text:p>
          </table:table-cell>
        </table:table-row>
      </table:table>
      <text:list text:style-name="L14">
        <text:list-item>
          <text:p text:style-name="P113"><text:span text:style-name="T301">The covering cast over all people and the </text:span>vail <text:span text:style-name="T301">that is cast over all nations </text:span><text:span text:style-name="T302">(</text:span><text:span text:style-name="T303">Isa</text:span><text:span text:style-name="T304">iah</text:span><text:span text:style-name="T303"> 25:7</text:span><text:span text:style-name="T302">) </text:span>is removed <text:span text:style-name="T305">in an individual </text:span><text:span text:style-name="T306">when the</text:span><text:span text:style-name="T305">ir</text:span><text:span text:style-name="T306"> mind/heart turns to </text:span><text:span text:style-name="T307">the Lord Jesus </text:span><text:span text:style-name="T306">Christ.</text:span></text:p>
        </text:list-item>
      </text:list>
      <text:p text:style-name="P114"/>
      <text:p text:style-name="P114"/>
      <table:table table:name="Table9" table:style-name="Table9">
        <table:table-column table:style-name="Table9.A"/>
        <table:table-row>
          <table:table-cell table:style-name="Table9.A1" office:value-type="string">
            <text:p text:style-name="P115"><text:span text:style-name="T308">Acts 8:37<text:line-break/></text:span>And Philip said, <text:span text:style-name="T10">If thou believest with all thine heart</text:span>, thou mayest. And he answered and said, I believe that Jesus Christ is the Son of God <text:span text:style-name="T309">[</text:span><text:span text:style-name="T310">1 John 4:15</text:span><text:span text:style-name="T8">; reborn before he spoke</text:span><text:span text:style-name="T309">]</text:span>.</text:p>
            <text:p text:style-name="P116"/>
            <text:p text:style-name="P117"><text:span text:style-name="T6">Romans 10:10</text:span><text:line-break/>For <text:span text:style-name="T10">with the heart man believeth unto righteousness</text:span>; and with the mouth confession is made unto salvation.</text:p>
          </table:table-cell>
        </table:table-row>
      </table:table>
      <text:list text:style-name="L15">
        <text:list-item>
          <text:p text:style-name="P118"><text:span text:style-name="T311">Spiritual rebirth is purely an issue of the heart. </text:span><text:span text:style-name="T312">Otherwise, the mute would have no hope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<text:soft-page-break/><text:span text:style-name="T313">Conclusion</text:span></text:p>
      <text:p text:style-name="P121"/>
      <text:p text:style-name="P122"><text:span text:style-name="T314">The “</text:span><text:span text:style-name="T315">anointed cherub that covereth</text:span><text:span text:style-name="T314">” is </text:span><text:span text:style-name="T316">the spirit </text:span><text:span text:style-name="T314">Lucifer </text:span><text:span text:style-name="T317">and </text:span><text:span text:style-name="T318">he was ordained by God to </text:span><text:span text:style-name="T319">physically</text:span><text:span text:style-name="T316"> </text:span><text:span text:style-name="T314">cover the entire earth </text:span><text:span text:style-name="T320">and/</text:span><text:span text:style-name="T321">or be responsible for the physical covering of the earth </text:span><text:span text:style-name="T314">(the air/</text:span><text:span text:style-name="T322">tou aeros</text:span><text:span text:style-name="T321">/</text:span><text:span text:style-name="T318">the heaven/firmament</text:span><text:span text:style-name="T314">)</text:span><text:span text:style-name="T321">.</text:span><text:span text:style-name="T314"> </text:span><text:span text:style-name="T321">S</text:span><text:span text:style-name="T316">piritually, </text:span><text:span text:style-name="T321">he is also responsible for </text:span><text:span text:style-name="T316">cover</text:span><text:span text:style-name="T321">ing/</text:span><text:span text:style-name="T323">blinding</text:span><text:span text:style-name="T316"> </text:span><text:span text:style-name="T314">the hearts/minds of every person that has </text:span><text:span text:style-name="T316">willfully sinned against God and has </text:span><text:span text:style-name="T314">not been set free by </text:span><text:span text:style-name="T324">our High Priest Jesus </text:span><text:span text:style-name="T314">Christ (</text:span><text:span text:style-name="T325">Isa</text:span><text:span text:style-name="T326">iah</text:span><text:span text:style-name="T325"> 14:17</text:span><text:span text:style-name="T327">c</text:span>, <text:span text:style-name="T328">Isaiah 55:11</text:span><text:span text:style-name="T314">).</text:span></text:p>
      <text:p text:style-name="P123"/>
      <text:p text:style-name="P124"><text:span text:style-name="T329">In </text:span><text:span text:style-name="T330">light</text:span><text:span text:style-name="T331"> of all that, it seems very fitting that his name is “Lucifer” which is Latin for “light-bearer” </text:span><text:span text:style-name="T332">because the atmosphere bears the light from the sun. </text:span><text:span text:style-name="T333">Note that dictionaries that define Lucifer as “the morning star” are a perversion of truth because they deify Satan (</text:span><text:span text:style-name="T334">Revelation 22:16</text:span><text:span text:style-name="T333">).</text:span></text:p>
      <text:p text:style-name="P123"/>
      <text:p text:style-name="P125">He appears to be physically represented as the vail in the tabernacle/temple.</text:p>
      <text:p text:style-name="P126"/>
      <text:p text:style-name="P127">He was created as a wonderfully beautiful and astoundingly powerful spirit with high authority and <text:span text:style-name="T335">he is </text:span>near to the throne of God. <text:span text:style-name="T335">He appears to still have access to God’s presence and mingles with the sons of God (</text:span><text:span text:style-name="T336">Job 1:6, 2:1</text:span><text:span text:style-name="T335">, </text:span><text:span text:style-name="T337">Matthew 13:24-30</text:span><text:span text:style-name="T338">, </text:span><text:span text:style-name="T336">John 6:70</text:span><text:span text:style-name="T335">, </text:span><text:span text:style-name="T336">Revelation 12:10</text:span><text:span text:style-name="T335">).</text:span></text:p>
      <text:p text:style-name="P127"/>
      <text:p text:style-name="P127"><text:span text:style-name="T339">He can likely take on any physical form he desires. </text:span><text:span text:style-name="T340">He can call down fire from heaven, create pestilences, </text:span><text:span text:style-name="T341">give life to inanimate objects, and likely many other </text:span><text:span text:style-name="T342">untold </text:span><text:span text:style-name="T341">miracles and wonders </text:span><text:span text:style-name="T343">as God permits.</text:span></text:p>
      <text:p text:style-name="P128"/>
      <text:p text:style-name="P129"><text:span text:style-name="T64">But, for all his “wisdom” </text:span><text:span text:style-name="T344">and power</text:span><text:span text:style-name="T64"> he also has </text:span><text:span text:style-name="T345">many</text:span><text:span text:style-name="T64"> weaknesses </text:span><text:span text:style-name="T346">simply </text:span><text:span text:style-name="T64">because he has no truth</text:span><text:span text:style-name="T347"> </text:span><text:span text:style-name="T64">in him </text:span><text:span text:style-name="T347">(</text:span><text:span text:style-name="T348">John 17:17</text:span><text:span text:style-name="T347">)</text:span><text:span text:style-name="T64">: </text:span><text:span text:style-name="T347">therefore </text:span><text:span text:style-name="T64">he cannot speak, hear, understand, or believe the word of God. </text:span><text:span text:style-name="T349">He also seems to be thoroughly deceived </text:span><text:span text:style-name="T350">in thinking </text:span><text:span text:style-name="T349">that he can defeat God (</text:span><text:span text:style-name="T351">Revelation 20:3</text:span><text:span text:style-name="T349">).</text:span></text:p>
      <text:p text:style-name="P130"/>
      <text:p text:style-name="P131">He is very angry and his objectives are to kill, steal, destroy, <text:span text:style-name="T352">and </text:span><text:span text:style-name="T353">Isaiah 14:13,14</text:span>.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oft-page-break/><text:span text:style-name="T354">Notes that didn’t make it into the final cut</text:span></text:p>
      <text:p text:style-name="P133">(<text:span text:style-name="T355">because 9 pages</text:span>)</text:p>
      <text:p text:style-name="P134"/>
      <text:p text:style-name="P134"><text:span text:style-name="T356">T</text:span><text:span text:style-name="T357">he four living creatures in </text:span><text:span text:style-name="T358">Ezekiel</text:span><text:span text:style-name="T357"> are below the firmament which </text:span><text:span text:style-name="T359">the throne is in</text:span><text:span text:style-name="T357">. The four beasts in </text:span><text:span text:style-name="T358">Revelation 4:6,7</text:span><text:span text:style-name="T357"> are around the throne which is </text:span><text:span text:style-name="T360">in</text:span><text:span text:style-name="T357"> the firmament </text:span><text:span text:style-name="T361">which is above</text:span><text:span text:style-name="T357"> </text:span><text:span text:style-name="T360">the </text:span><text:span text:style-name="T357">living creatures in </text:span><text:span text:style-name="T358">Ezekiel</text:span><text:span text:style-name="T357">. </text:span><text:span text:style-name="T362">When put together we see two separate groups of </text:span><text:span text:style-name="T363">creatures</text:span><text:span text:style-name="T362"> around and below the throne of God</text:span><text:span text:style-name="T363">. </text:span><text:span text:style-name="T364">Moreover</text:span><text:span text:style-name="T365">, both the faces of the living creatures below (</text:span><text:span text:style-name="T366">Eze</text:span><text:span text:style-name="T367">kiel</text:span><text:span text:style-name="T366"> 1:1,10</text:span><text:span text:style-name="T365">, </text:span><text:span text:style-name="T366">10:14,22</text:span><text:span text:style-name="T365">) and the beasts above each perfectly align with </text:span><text:span text:style-name="T368">the </text:span><text:span text:style-name="T365">four </text:span><text:span text:style-name="T369">closest </text:span><text:span text:style-name="T365">tribes </text:span><text:span text:style-name="T370">(excluding Levi)</text:span><text:span text:style-name="T365"> that camped around the tabernacle (</text:span><text:span text:style-name="T366">Numbers 2</text:span><text:span text:style-name="T365">): Judah/Lion/East, Reuben/Man/South, Ephraim/Ox or Cherub/West, Dan/Eagle/North. </text:span><text:span text:style-name="T371">We know the face of the Cherub was an Ox because of </text:span><text:span text:style-name="T367">Ezekiel 1:1,10</text:span><text:span text:style-name="T371">, </text:span><text:span text:style-name="T367">10:14,22</text:span><text:span text:style-name="T371">.</text:span></text:p>
      <text:p text:style-name="P134"/>
      <text:p text:style-name="Horizontal_20_Line"/>
      <text:p text:style-name="P134"/>
      <text:p text:style-name="P134">Regarding “<text:span text:style-name="T99">son of the morning</text:span>” (<text:span text:style-name="T6">Isaiah 14:12</text:span>, <text:span text:style-name="T6">Job 38:7</text:span>):</text:p>
      <text:p text:style-name="P13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5"><text:span text:style-name="T6">Genesis 1:1-5</text:span><text:line-break/><text:span text:style-name="T8">1</text:span> In the beginning God created the heaven and the earth.<text:line-break/><text:span text:style-name="T8">2</text:span> And the earth was without form, and void; and darkness was upon the face of the deep. And the Spirit of God moved upon the face of the waters.</text:p>
          </table:table-cell>
          <table:table-cell table:style-name="Table10.B1" office:value-type="string">
            <text:p text:style-name="P136">The first evening</text:p>
          </table:table-cell>
          <table:table-cell table:style-name="Table10.C1" table:number-rows-spanned="2" office:value-type="string">
            <text:p text:style-name="P136">The first day</text:p>
          </table:table-cell>
        </table:table-row>
        <table:table-row>
          <table:table-cell table:style-name="Table10.A2" office:value-type="string">
            <text:p text:style-name="P137"><text:span text:style-name="T8">3</text:span> And God said, Let there be light: and there was light.<text:line-break/><text:span text:style-name="T8">4</text:span> And God saw the light, that it was good: and God divided the light from the darkness.<text:line-break/><text:span text:style-name="T8">5</text:span> And God called the light Day, and the darkness he called Night. And the evening and the morning were the first day.</text:p>
          </table:table-cell>
          <table:table-cell table:style-name="Table10.B2" office:value-type="string">
            <text:p text:style-name="P136">The first morning</text:p>
          </table:table-cell>
          <table:covered-table-cell table:style-name="Table10.C1"/>
        </table:table-row>
        <table:table-row>
          <table:table-cell table:style-name="Table10.A3" office:value-type="string">
            <text:p text:style-name="P137"><text:span text:style-name="T6">Genesis 1:6-8</text:span><text:line-break/><text:span text:style-name="T8">6</text:span> And God said, Let there be a firmament in the midst of the waters, and let it divide the waters from the waters.<text:line-break/><text:span text:style-name="T8">7</text:span> And God made the firmament, and divided the waters which were under the firmament from the waters which were above the firmament: and it was so.<text:line-break/><text:span text:style-name="T8">8</text:span> And God called the firmament Heaven. And the evening and the morning were the second day.</text:p>
          </table:table-cell>
          <table:table-cell table:style-name="Table10.B2" office:value-type="string">
            <text:p text:style-name="P136"/>
          </table:table-cell>
          <table:table-cell table:style-name="Table10.C3" office:value-type="string">
            <text:p text:style-name="P138">The second day</text:p>
          </table:table-cell>
        </table:table-row>
      </table:table>
      <text:list text:style-name="L16">
        <text:list-item>
          <text:p text:style-name="P139">The first day <text:span text:style-name="T372">elapsed</text:span> before the earth was created.</text:p>
          <text:list>
            <text:list-item>
              <text:p text:style-name="P140">If Lucifer is a son of the <text:span text:style-name="T373">f</text:span>irst morning, then he was created in the latter half of the first day.</text:p>
            </text:list-item>
          </text:list>
        </text:list-item>
        <text:list-item>
          <text:p text:style-name="P141">The firmament/heaven was created on the second day.</text:p>
          <text:list>
            <text:list-item>
              <text:p text:style-name="P142">Lucifer necessarily had to be created <text:span text:style-name="T374">during</text:span> or <text:span text:style-name="T374">before</text:span> this day.</text:p>
            </text:list-item>
          </text:list>
        </text:list-item>
        <text:list-item>
          <text:p text:style-name="P143"><text:span text:style-name="T375">Job 38:7</text:span> could <text:span text:style-name="T376">not have occurred before </text:span><text:span text:style-name="T375">Genesis 1:9</text:span><text:span text:style-name="T376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17:21:34.700102400</meta:creation-date>
    <dc:title>default</dc:title>
    <meta:editing-duration>P1DT9H18M39S</meta:editing-duration>
    <meta:editing-cycles>922</meta:editing-cycles>
    <meta:generator>LibreOffice/26.2.4.2$Linux_X86_64 LibreOffice_project/64a984c51f4702dbd3710b13428c673a2f1292e7</meta:generator>
    <dc:date>2026-07-11T12:19:56.194319570</dc:date>
    <meta:print-date>2026-03-29T07:58:12.174526000</meta:print-date>
    <meta:document-statistic meta:table-count="16" meta:image-count="0" meta:object-count="0" meta:page-count="9" meta:paragraph-count="170" meta:word-count="3931" meta:character-count="21746" meta:non-whitespace-character-count="18045"/>
    <meta:template xlink:type="simple" xlink:actuate="onRequest" xlink:title="default" xlink:href="../../../../AppData/Roaming/LibreOffice/4/user/template/default1.ott" meta:date="2026-03-22T17:21:33.650082200"/>
  </office:meta>
</office:document-meta>
</file>