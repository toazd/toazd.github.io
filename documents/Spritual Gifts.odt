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8.2in" table:align="margins"/>
    </style:style>
    <style:style style:name="Table3.A" style:family="table-column">
      <style:table-column-properties style:column-width="8.2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 style:list-style-name="L1">
      <style:text-properties officeooo:paragraph-rsid="001ac802"/>
    </style:style>
    <style:style style:name="P2" style:family="paragraph" style:parent-style-name="Table_20_Contents" style:list-style-name="L1">
      <style:text-properties officeooo:paragraph-rsid="001b6599"/>
    </style:style>
    <style:style style:name="P3" style:family="paragraph" style:parent-style-name="Table_20_Contents" style:list-style-name="L1">
      <style:text-properties officeooo:rsid="00430dae" officeooo:paragraph-rsid="00430dae"/>
    </style:style>
    <style:style style:name="P4" style:family="paragraph" style:parent-style-name="Table_20_Contents">
      <style:text-properties officeooo:paragraph-rsid="001ac802"/>
    </style:style>
    <style:style style:name="P5" style:family="paragraph" style:parent-style-name="Table_20_Contents">
      <style:text-properties officeooo:paragraph-rsid="00635e53"/>
    </style:style>
    <style:style style:name="P6" style:family="paragraph" style:parent-style-name="Table_20_Contents" style:list-style-name="L2">
      <style:text-properties officeooo:rsid="00538534" officeooo:paragraph-rsid="00538534"/>
    </style:style>
    <style:style style:name="P7" style:family="paragraph" style:parent-style-name="Table_20_Contents" style:list-style-name="L2">
      <style:text-properties officeooo:rsid="00580ddd" officeooo:paragraph-rsid="00580ddd"/>
    </style:style>
    <style:style style:name="P8" style:family="paragraph" style:parent-style-name="Table_20_Contents" style:list-style-name="L2">
      <style:text-properties officeooo:rsid="0058d1a4" officeooo:paragraph-rsid="0058d1a4"/>
    </style:style>
    <style:style style:name="P9" style:family="paragraph" style:parent-style-name="Table_20_Contents">
      <style:text-properties officeooo:rsid="0058d1a4" officeooo:paragraph-rsid="0058d1a4"/>
    </style:style>
    <style:style style:name="T1" style:family="text">
      <style:text-properties fo:color="#127622" loext:opacity="100%" fo:font-weight="bold" style:font-weight-asian="bold" style:font-weight-complex="bold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style:text-position="super 58%" officeooo:rsid="001c3f4a" fo:background-color="transparent" loext:char-shading-value="0"/>
    </style:style>
    <style:style style:name="T7" style:family="text">
      <style:text-properties style:text-position="0% 100%" officeooo:rsid="001c3f4a" fo:background-color="transparent" loext:char-shading-value="0"/>
    </style:style>
    <style:style style:name="T8" style:family="text">
      <style:text-properties style:text-position="0% 100%" officeooo:rsid="001cfdd2" fo:background-color="transparent" loext:char-shading-value="0"/>
    </style:style>
    <style:style style:name="T9" style:family="text">
      <style:text-properties style:text-position="0% 100%" officeooo:rsid="001daaa4" fo:background-color="transparent" loext:char-shading-value="0"/>
    </style:style>
    <style:style style:name="T10" style:family="text">
      <style:text-properties style:text-position="0% 100%" officeooo:rsid="001ee419" fo:background-color="transparent" loext:char-shading-value="0"/>
    </style:style>
    <style:style style:name="T11" style:family="text">
      <style:text-properties style:text-position="0% 100%" officeooo:rsid="001fc741" fo:background-color="transparent" loext:char-shading-value="0"/>
    </style:style>
    <style:style style:name="T12" style:family="text">
      <style:text-properties style:text-position="0% 100%" officeooo:rsid="0021328b" fo:background-color="transparent" loext:char-shading-value="0"/>
    </style:style>
    <style:style style:name="T13" style:family="text">
      <style:text-properties style:text-position="super 58%" officeooo:rsid="002248fc"/>
    </style:style>
    <style:style style:name="T14" style:family="text">
      <style:text-properties style:text-position="super 58%" officeooo:rsid="00236d25"/>
    </style:style>
    <style:style style:name="T15" style:family="text">
      <style:text-properties style:text-position="super 58%" officeooo:rsid="0023c107"/>
    </style:style>
    <style:style style:name="T16" style:family="text">
      <style:text-properties style:text-position="0% 100%" officeooo:rsid="00236d25"/>
    </style:style>
    <style:style style:name="T17" style:family="text">
      <style:text-properties style:text-position="0% 100%" officeooo:rsid="00256b45"/>
    </style:style>
    <style:style style:name="T18" style:family="text">
      <style:text-properties style:text-position="super 58%" officeooo:rsid="0028da8b" fo:background-color="transparent" loext:char-shading-value="0"/>
    </style:style>
    <style:style style:name="T19" style:family="text">
      <style:text-properties officeooo:rsid="0028da8b" fo:background-color="transparent" loext:char-shading-value="0"/>
    </style:style>
    <style:style style:name="T20" style:family="text">
      <style:text-properties officeooo:rsid="002a0a21" fo:background-color="transparent" loext:char-shading-value="0"/>
    </style:style>
    <style:style style:name="T21" style:family="text">
      <style:text-properties style:text-position="super 58%" officeooo:rsid="002cec05"/>
    </style:style>
    <style:style style:name="T22" style:family="text">
      <style:text-properties style:text-position="0% 100%" officeooo:rsid="002cec05"/>
    </style:style>
    <style:style style:name="T23" style:family="text">
      <style:text-properties style:text-position="0% 100%" officeooo:rsid="002ee4d1"/>
    </style:style>
    <style:style style:name="T24" style:family="text">
      <style:text-properties style:text-position="0% 100%" officeooo:rsid="00353e3d"/>
    </style:style>
    <style:style style:name="T25" style:family="text">
      <style:text-properties style:text-position="0% 100%" officeooo:rsid="00306592"/>
    </style:style>
    <style:style style:name="T26" style:family="text">
      <style:text-properties style:text-position="0% 100%" officeooo:rsid="0031256e"/>
    </style:style>
    <style:style style:name="T27" style:family="text">
      <style:text-properties style:text-position="0% 100%" officeooo:rsid="0032bfb8"/>
    </style:style>
    <style:style style:name="T28" style:family="text">
      <style:text-properties style:text-position="0% 100%" officeooo:rsid="00332a2e"/>
    </style:style>
    <style:style style:name="T29" style:family="text">
      <style:text-properties style:text-position="0% 100%" officeooo:rsid="00347b60"/>
    </style:style>
    <style:style style:name="T30" style:family="text">
      <style:text-properties style:text-position="super 58%" officeooo:rsid="002cec05" fo:background-color="transparent" loext:char-shading-value="0"/>
    </style:style>
    <style:style style:name="T31" style:family="text">
      <style:text-properties officeooo:rsid="002cec05" fo:background-color="transparent" loext:char-shading-value="0"/>
    </style:style>
    <style:style style:name="T32" style:family="text">
      <style:text-properties officeooo:rsid="0038482c" fo:background-color="transparent" loext:char-shading-value="0"/>
    </style:style>
    <style:style style:name="T33" style:family="text">
      <style:text-properties style:text-position="super 58%" officeooo:rsid="001c215b" fo:background-color="transparent" loext:char-shading-value="0"/>
    </style:style>
    <style:style style:name="T34" style:family="text">
      <style:text-properties style:text-position="0% 100%" officeooo:rsid="001c215b" fo:background-color="transparent" loext:char-shading-value="0"/>
    </style:style>
    <style:style style:name="T35" style:family="text">
      <style:text-properties style:text-position="super 58%" officeooo:rsid="001b6599"/>
    </style:style>
    <style:style style:name="T36" style:family="text">
      <style:text-properties style:text-position="0% 100%" officeooo:rsid="001b6599"/>
    </style:style>
    <style:style style:name="T37" style:family="text">
      <style:text-properties style:text-position="super 58%" officeooo:rsid="003aa36d" fo:background-color="transparent" loext:char-shading-value="0"/>
    </style:style>
    <style:style style:name="T38" style:family="text">
      <style:text-properties style:text-position="0% 100%" officeooo:rsid="003aa36d" fo:background-color="transparent" loext:char-shading-value="0"/>
    </style:style>
    <style:style style:name="T39" style:family="text">
      <style:text-properties style:text-position="0% 100%" officeooo:rsid="003c04b1" fo:background-color="transparent" loext:char-shading-value="0"/>
    </style:style>
    <style:style style:name="T40" style:family="text">
      <style:text-properties style:text-position="0% 100%" officeooo:rsid="003c1172" fo:background-color="transparent" loext:char-shading-value="0"/>
    </style:style>
    <style:style style:name="T41" style:family="text">
      <style:text-properties style:text-position="super 58%" officeooo:rsid="003c572a"/>
    </style:style>
    <style:style style:name="T42" style:family="text">
      <style:text-properties style:text-position="0% 100%" officeooo:rsid="003c572a"/>
    </style:style>
    <style:style style:name="T43" style:family="text">
      <style:text-properties style:text-position="0% 100%" officeooo:rsid="003e3b29"/>
    </style:style>
    <style:style style:name="T44" style:family="text">
      <style:text-properties style:text-position="0% 100%" officeooo:rsid="003f4984"/>
    </style:style>
    <style:style style:name="T45" style:family="text">
      <style:text-properties style:text-position="super 58%" officeooo:rsid="00411b02"/>
    </style:style>
    <style:style style:name="T46" style:family="text">
      <style:text-properties style:text-position="0% 100%" officeooo:rsid="00411b02"/>
    </style:style>
    <style:style style:name="T47" style:family="text">
      <style:text-properties style:text-position="0% 100%" officeooo:rsid="00445b39"/>
    </style:style>
    <style:style style:name="T48" style:family="text">
      <style:text-properties style:text-position="0% 100%" officeooo:rsid="0045b5ba"/>
    </style:style>
    <style:style style:name="T49" style:family="text">
      <style:text-properties officeooo:rsid="00469fdc"/>
    </style:style>
    <style:style style:name="T50" style:family="text">
      <style:text-properties officeooo:rsid="004ce957"/>
    </style:style>
    <style:style style:name="T51" style:family="text">
      <style:text-properties officeooo:rsid="004b916b"/>
    </style:style>
    <style:style style:name="T52" style:family="text">
      <style:text-properties officeooo:rsid="00490075"/>
    </style:style>
    <style:style style:name="T53" style:family="text">
      <style:text-properties officeooo:rsid="0049abed"/>
    </style:style>
    <style:style style:name="T54" style:family="text">
      <style:text-properties officeooo:rsid="004b244c"/>
    </style:style>
    <style:style style:name="T55" style:family="text">
      <style:text-properties officeooo:rsid="004bb4ca"/>
    </style:style>
    <style:style style:name="T56" style:family="text">
      <style:text-properties officeooo:rsid="004bc3a3"/>
    </style:style>
    <style:style style:name="T57" style:family="text">
      <style:text-properties officeooo:rsid="004be841"/>
    </style:style>
    <style:style style:name="T58" style:family="text">
      <style:text-properties officeooo:rsid="004e9bb3"/>
    </style:style>
    <style:style style:name="T59" style:family="text">
      <style:text-properties officeooo:rsid="00506a88"/>
    </style:style>
    <style:style style:name="T60" style:family="text">
      <style:text-properties officeooo:rsid="0047f630"/>
    </style:style>
    <style:style style:name="T61" style:family="text">
      <style:text-properties fo:background-color="#ffff00" loext:char-shading-value="0"/>
    </style:style>
    <style:style style:name="T62" style:family="text">
      <style:text-properties fo:font-style="italic" fo:background-color="#ffff00" loext:char-shading-value="0"/>
    </style:style>
    <style:style style:name="T63" style:family="text">
      <style:text-properties officeooo:rsid="005762bc"/>
    </style:style>
    <style:style style:name="T64" style:family="text">
      <style:text-properties style:text-position="super 58%"/>
    </style:style>
    <style:style style:name="T65" style:family="text">
      <style:text-properties style:text-position="0% 100%"/>
    </style:style>
    <style:style style:name="T66" style:family="text">
      <style:text-properties style:text-position="0% 100%" officeooo:rsid="0055b087"/>
    </style:style>
    <style:style style:name="T67" style:family="text">
      <style:text-properties style:text-position="0% 100%" officeooo:rsid="0054e1f0"/>
    </style:style>
    <style:style style:name="T68" style:family="text">
      <style:text-properties style:text-position="0% 100%" officeooo:rsid="0058d1a4"/>
    </style:style>
    <style:style style:name="T69" style:family="text">
      <style:text-properties style:text-position="0% 100%" officeooo:rsid="005ac996"/>
    </style:style>
    <style:style style:name="T70" style:family="text">
      <style:text-properties style:text-position="0% 100%" officeooo:rsid="005c5b3c"/>
    </style:style>
    <style:style style:name="T71" style:family="text">
      <style:text-properties style:text-position="0% 100%" officeooo:rsid="005e38b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Romans 12:1-8</text:span><text:line-break/><text:span text:style-name="T2">1</text:span> I beseech you therefore, brethren, by the mercies of God, that ye present your bodies a living sacrifice, holy, acceptable unto God, <text:span text:style-name="T3">which is</text:span> your reasonable service. <text:line-break/><text:span text:style-name="T2">2</text:span> And be not conformed to this world: but be ye transformed by the renewing of your mind, that ye may prove what <text:span text:style-name="T3">is</text:span> that good, and acceptable, and perfect, will of God. <text:line-break/><text:span text:style-name="T2">3</text:span> For I say, through the grace given unto me, to every man that is among you, not to think <text:span text:style-name="T3">of himself</text:span> more highly than he ought to think; but to think soberly, according as God hath dealt to every man the measure of faith. <text:line-break/><text:span text:style-name="T2">4</text:span> For as we have many members in one body, and all members have not the same office: <text:line-break/><text:span text:style-name="T2">5</text:span> So we, <text:span text:style-name="T3">being</text:span> many, are one body in Christ, and every one members one of another. <text:line-break/><text:span text:style-name="T2">6</text:span> Having then gifts differing according to the grace that is given to us, whether <text:span text:style-name="T4">prophecy</text:span>, <text:span text:style-name="T3">let us prophesy</text:span> according to the proportion of faith; <text:line-break/><text:span text:style-name="T2">7</text:span> Or <text:span text:style-name="T4">ministry</text:span>, <text:span text:style-name="T3">let us wait</text:span> on <text:span text:style-name="T3">our</text:span> ministering: or he that teacheth, on <text:span text:style-name="T4">teaching</text:span>; <text:line-break/><text:span text:style-name="T2">8</text:span> Or he that exhorteth, on <text:span text:style-name="T4">exhortation</text:span>: he that <text:span text:style-name="T5">giveth</text:span>, <text:span text:style-name="T3">let him do it</text:span> with simplicity; he that <text:span text:style-name="T5">ruleth</text:span>, with diligence; he that sheweth mercy, with cheerfulness.</text:p>
          </table:table-cell>
        </table:table-row>
      </table:table>
      <text:p text:style-name="Standard"/>
      <text:list text:style-name="L1">
        <text:list-item>
          <text:p text:style-name="P1">whether <text:span text:style-name="T4">prophecy</text:span>, <text:span text:style-name="T3">let us prophesy</text:span> according to the proportion of faith;</text:p>
        </text:list-item>
        <text:list-item>
          <text:p text:style-name="P2">Or <text:span text:style-name="T4">ministry</text:span><text:span text:style-name="T6">G1248</text:span><text:span text:style-name="T7"> (</text:span><text:span text:style-name="T8">serving, ministration, </text:span><text:span text:style-name="T9">relief, </text:span><text:span text:style-name="T10">office, service, </text:span><text:span text:style-name="T11">administrations, </text:span><text:span text:style-name="T12">[do] service</text:span><text:span text:style-name="T7">)</text:span>, <text:span text:style-name="T3">let us wait</text:span> on <text:span text:style-name="T3">our</text:span> ministering<text:span text:style-name="T13">G1248</text:span>:</text:p>
        </text:list-item>
        <text:list-item>
          <text:p text:style-name="P2">or he that <text:span text:style-name="T4">teacheth</text:span><text:span text:style-name="T14">G1</text:span><text:span text:style-name="T15">321</text:span><text:span text:style-name="T16"> (</text:span><text:span text:style-name="T17">taught</text:span><text:span text:style-name="T16">)</text:span>, on <text:span text:style-name="T5">teaching</text:span><text:span text:style-name="T18">G1319</text:span><text:span text:style-name="T19"> (</text:span><text:span text:style-name="T20">doctrine[s], learning</text:span><text:span text:style-name="T19">)</text:span>;</text:p>
          <text:list>
            <text:list-item>
              <text:p text:style-name="P3">or he that teacheth, [let him wait on his] teaching</text:p>
            </text:list-item>
          </text:list>
        </text:list-item>
        <text:list-item>
          <text:p text:style-name="P2">Or he that <text:span text:style-name="T4">exhorteth</text:span><text:span text:style-name="T21">G3870</text:span><text:span text:style-name="T22"> </text:span><text:span text:style-name="T23">(</text:span><text:span text:style-name="T24">[good] </text:span><text:span text:style-name="T25">comfort</text:span><text:span text:style-name="T24">[</text:span><text:span text:style-name="T25">ed</text:span><text:span text:style-name="T24">]</text:span><text:span text:style-name="T25">, beseech, </text:span><text:span text:style-name="T26">besought, </text:span><text:span text:style-name="T27">pray, </text:span><text:span text:style-name="T28">intreated, </text:span><text:span text:style-name="T29">desired/desiring, called [for]</text:span><text:span text:style-name="T23">)</text:span>, on <text:span text:style-name="T5">exhortation</text:span><text:span text:style-name="T30">G3874</text:span><text:span text:style-name="T31"> (</text:span><text:span text:style-name="T32">consolation, comfort</text:span><text:span text:style-name="T31">)</text:span>:</text:p>
          <text:list>
            <text:list-item>
              <text:p text:style-name="P3">or he that exhorteth, [let him wait on his] exhortation</text:p>
            </text:list-item>
          </text:list>
        </text:list-item>
        <text:list-item>
          <text:p text:style-name="P2">he that <text:span text:style-name="T4">giveth</text:span><text:span text:style-name="T33">G3330</text:span><text:span text:style-name="T34"> (impart, to give)</text:span>, <text:span text:style-name="T3">let him do it</text:span> with simplicity<text:span text:style-name="T35">G572</text:span><text:span text:style-name="T36"> (liberality, bountifulness, singleness)</text:span>;</text:p>
        </text:list-item>
        <text:list-item>
          <text:p text:style-name="P1">he that <text:span text:style-name="T4">ruleth</text:span><text:span text:style-name="T37">G4291</text:span><text:span text:style-name="T38"> (</text:span><text:span text:style-name="T39">are over, </text:span><text:span text:style-name="T40">to maintain</text:span><text:span text:style-name="T38">)</text:span>, with diligence<text:span text:style-name="T41">G4710</text:span><text:span text:style-name="T42"> (</text:span><text:span text:style-name="T43">haste, business, [care]fulness, </text:span><text:span text:style-name="T44">forwardnes, earnest care</text:span><text:span text:style-name="T42">)</text:span>;</text:p>
        </text:list-item>
        <text:list-item>
          <text:p text:style-name="P1">he that <text:span text:style-name="T4">sheweth mercy</text:span><text:span text:style-name="T45">G1653</text:span><text:span text:style-name="T46"> (</text:span><text:span text:style-name="T47">co</text:span><text:span text:style-name="T48">m</text:span><text:span text:style-name="T47">passion, pity</text:span><text:span text:style-name="T46">)</text:span>, with cheerfulness <text:span text:style-name="T49">(good</text:span><text:span text:style-name="T50">[ly]</text:span><text:span text:style-name="T49">, well, fair, pleaseth/</text:span><text:span text:style-name="T51">pleased</text:span><text:span text:style-name="T49">, </text:span><text:span text:style-name="T52">better, best, </text:span><text:span text:style-name="T53">diligent, </text:span><text:span text:style-name="T54">prosperity, </text:span><text:span text:style-name="T55">glad, merry, favour, </text:span><text:span text:style-name="T56">accepted, </text:span><text:span text:style-name="T57">kindness, </text:span><text:span text:style-name="T58">precious, </text:span><text:span text:style-name="T59">fine, ...</text:span><text:span text:style-name="T60">)</text:span>.</text:p>
        </text:list-item>
      </text:list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1 Corinthians 12:4-11</text:span><text:line-break/><text:span text:style-name="T2">4</text:span> Now there are diversities of gifts, but the same Spirit. <text:line-break/><text:span text:style-name="T2">5</text:span> And there are differences of administrations, but the same Lord. <text:line-break/><text:span text:style-name="T2">6</text:span> And there are diversities of operations, but it is the same God which worketh all in all. <text:line-break/><text:span text:style-name="T2">7</text:span> But the manifestation of the Spirit is given to every man to profit withal. <text:line-break/><text:span text:style-name="T2">8</text:span> For to one is given by the Spirit <text:span text:style-name="T61">the word of wisdom</text:span>; to another <text:span text:style-name="T61">the word of knowledge</text:span> by the same Spirit; <text:line-break/><text:span text:style-name="T2">9</text:span> To another <text:span text:style-name="T61">faith</text:span> by the same Spirit; to another <text:span text:style-name="T61">the gifts of healing</text:span> by the same Spirit; <text:line-break/><text:span text:style-name="T2">10</text:span> To another <text:span text:style-name="T61">the working of miracles</text:span>; to another <text:span text:style-name="T61">prophecy</text:span>; to another <text:span text:style-name="T61">discerning of spirits</text:span>; to another <text:span text:style-name="T62">divers</text:span><text:span text:style-name="T61"> kinds of tongues</text:span>; to another <text:span text:style-name="T61">the interpretation of tongues</text:span>:</text:p>
            <text:p text:style-name="P5"><text:span text:style-name="T2">11</text:span> But all these worketh that one and the selfsame Spirit, dividing to every man severally as he will.</text:p>
            <text:p text:style-name="P5"><text:line-break/><text:span text:style-name="T1">1 Corinthians 12:27-28</text:span><text:line-break/><text:span text:style-name="T2">27</text:span> Now ye are the body of Christ, and members in particular.</text:p>
            <text:p text:style-name="P5"><text:span text:style-name="T2">28</text:span> And God hath set some in the church, first <text:span text:style-name="T61">apostles</text:span>, secondarily <text:span text:style-name="T61">prophets</text:span>, thirdly <text:span text:style-name="T61">teachers</text:span>, after that <text:span text:style-name="T61">miracles</text:span>, then <text:span text:style-name="T61">gifts of healings</text:span>, <text:span text:style-name="T61">helps</text:span>, <text:span text:style-name="T61">governments</text:span>, <text:span text:style-name="T61">diversities of tongues</text:span>.</text:p>
          </table:table-cell>
        </table:table-row>
      </table:table>
      <text:list text:style-name="L2">
        <text:list-item>
          <text:p text:style-name="P6"><text:span text:style-name="T63">v</text:span>5 – administrations<text:span text:style-name="T64">G1248</text:span><text:span text:style-name="T65"> (</text:span><text:span text:style-name="T66">service/</text:span><text:span text:style-name="T67">serving, ministry, </text:span><text:span text:style-name="T66">relief, office</text:span><text:span text:style-name="T65">)</text:span></text:p>
        </text:list-item>
        <text:list-item>
          <text:p text:style-name="P7">v6 – operations<text:span text:style-name="T64">G1755</text:span><text:span text:style-name="T65"> (</text:span><text:span text:style-name="T68">the working</text:span><text:span text:style-name="T65">)</text:span></text:p>
        </text:list-item>
        <text:list-item>
          <text:p text:style-name="P8">v7 – profit withal<text:span text:style-name="T64">G4851</text:span><text:span text:style-name="T65"> (</text:span><text:span text:style-name="T69">it is profitable, it were better, it is good, it is expedient, </text:span><text:span text:style-name="T70">brought together, </text:span><text:span text:style-name="T71">our profit</text:span><text:span text:style-name="T65">)</text:span></text:p>
        </text:list-item>
      </text:list>
      <text:p text:style-name="P9"/>
      <text:p text:style-name="P9"/>
      <text:p text:style-name="P9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Table_20_Contents"><text:span text:style-name="T1">Ephesians 4:11-12</text:span><text:line-break/><text:span text:style-name="T2">11</text:span> And he gave some, <text:span text:style-name="T61">apostles</text:span>; and some, <text:span text:style-name="T61">prophets</text:span>; and some, <text:span text:style-name="T61">evangelists</text:span>; and some, <text:span text:style-name="T61">pastors and teachers</text:span>; <text:line-break/><text:span text:style-name="T2">12</text:span> For the perfecting of the saints, for the work of the ministry, for the edifying of the body of Christ: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6T12:35:48.164000000</meta:creation-date>
    <meta:editing-duration>PT1H37S</meta:editing-duration>
    <meta:editing-cycles>74</meta:editing-cycles>
    <meta:generator>LibreOffice/24.8.5.2$Windows_X86_64 LibreOffice_project/fddf2685c70b461e7832239a0162a77216259f22</meta:generator>
    <dc:title>BibleStudyTemplate</dc:title>
    <dc:date>2025-03-16T13:56:05.221000000</dc:date>
    <meta:document-statistic meta:table-count="3" meta:image-count="0" meta:object-count="0" meta:page-count="2" meta:paragraph-count="18" meta:word-count="605" meta:character-count="3652" meta:non-whitespace-character-count="3059"/>
    <meta:template xlink:type="simple" xlink:actuate="onRequest" xlink:title="BibleStudyTemplate" xlink:href="file:///C:/Users/wmcda/AppData/Roaming/LibreOffice/4/user/template/BibleStudyTemplate.ott" meta:date="2025-03-16T12:35:47.840000000"/>
  </office:meta>
</office:document-meta>
</file>