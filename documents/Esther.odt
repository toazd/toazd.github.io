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9in" table:align="margins"/>
    </style:style>
    <style:style style:name="Table1.A" style:family="table-column">
      <style:table-column-properties style:column-width="7.9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7.9in" table:align="margins"/>
    </style:style>
    <style:style style:name="Table2.A" style:family="table-column">
      <style:table-column-properties style:column-width="7.9in" style:rel-column-width="65535*"/>
    </style:style>
    <style:style style:name="Table2.A1" style:family="table-cell">
      <style:table-cell-properties fo:padding="0.0382in" fo:border="0.5pt solid #000000"/>
    </style:style>
    <style:style style:name="Table9" style:family="table">
      <style:table-properties style:width="7.9in" table:align="margins"/>
    </style:style>
    <style:style style:name="Table9.A" style:family="table-column">
      <style:table-column-properties style:column-width="7.9in" style:rel-column-width="65535*"/>
    </style:style>
    <style:style style:name="Table9.A1" style:family="table-cell">
      <style:table-cell-properties fo:padding="0.0382in" fo:border="0.5pt solid #000000"/>
    </style:style>
    <style:style style:name="Table10" style:family="table">
      <style:table-properties style:width="7.9in" table:align="margins"/>
    </style:style>
    <style:style style:name="Table10.A" style:family="table-column">
      <style:table-column-properties style:column-width="7.9in" style:rel-column-width="65535*"/>
    </style:style>
    <style:style style:name="Table10.A1" style:family="table-cell">
      <style:table-cell-properties fo:padding="0.0382in" fo:border="0.5pt solid #000000"/>
    </style:style>
    <style:style style:name="Table3" style:family="table">
      <style:table-properties style:width="7.9in" table:align="margins"/>
    </style:style>
    <style:style style:name="Table3.A" style:family="table-column">
      <style:table-column-properties style:column-width="7.9in" style:rel-column-width="65535*"/>
    </style:style>
    <style:style style:name="Table3.A1" style:family="table-cell">
      <style:table-cell-properties fo:padding="0.0382in" fo:border="0.5pt solid #000000"/>
    </style:style>
    <style:style style:name="Table7" style:family="table">
      <style:table-properties style:width="7.9in" table:align="margins"/>
    </style:style>
    <style:style style:name="Table7.A" style:family="table-column">
      <style:table-column-properties style:column-width="7.9in" style:rel-column-width="65535*"/>
    </style:style>
    <style:style style:name="Table7.A1" style:family="table-cell">
      <style:table-cell-properties fo:padding="0.0382in" fo:border="0.5pt solid #000000"/>
    </style:style>
    <style:style style:name="Table4" style:family="table">
      <style:table-properties style:width="7.9014in" fo:margin-left="0in" table:align="left"/>
    </style:style>
    <style:style style:name="Table4.A" style:family="table-column">
      <style:table-column-properties style:column-width="0.9694in"/>
    </style:style>
    <style:style style:name="Table4.B" style:family="table-column">
      <style:table-column-properties style:column-width="6.9319in"/>
    </style:style>
    <style:style style:name="Table4.A1" style:family="table-cell">
      <style:table-cell-properties style:vertical-align="middle" fo:padding="0.0313in" fo:border-left="0.75pt solid #000000" fo:border-right="none" fo:border-top="0.75pt solid #000000" fo:border-bottom="0.75pt solid #000000"/>
    </style:style>
    <style:style style:name="Table4.B1" style:family="table-cell">
      <style:table-cell-properties style:vertical-align="middle" fo:padding="0.0313in" fo:border="0.75pt solid #000000"/>
    </style:style>
    <style:style style:name="Table4.A2" style:family="table-cell">
      <style:table-cell-properties style:vertical-align="middle" fo:padding="0.0313in" fo:border-left="0.75pt solid #000000" fo:border-right="none" fo:border-top="none" fo:border-bottom="0.75pt solid #000000"/>
    </style:style>
    <style:style style:name="Table4.B2" style:family="table-cell">
      <style:table-cell-properties style:vertical-align="middle" fo:padding="0.0313in" fo:border-left="0.75pt solid #000000" fo:border-right="0.75pt solid #000000" fo:border-top="none" fo:border-bottom="0.75pt solid #000000"/>
    </style:style>
    <style:style style:name="Table5" style:family="table">
      <style:table-properties style:width="7.9in" table:align="margins"/>
    </style:style>
    <style:style style:name="Table5.A" style:family="table-column">
      <style:table-column-properties style:column-width="7.9in" style:rel-column-width="65535*"/>
    </style:style>
    <style:style style:name="Table5.A1" style:family="table-cell">
      <style:table-cell-properties fo:padding="0.0382in" fo:border="0.5pt solid #000000"/>
    </style:style>
    <style:style style:name="Table6" style:family="table">
      <style:table-properties style:width="7.9in" table:align="margins"/>
    </style:style>
    <style:style style:name="Table6.A" style:family="table-column">
      <style:table-column-properties style:column-width="7.9in" style:rel-column-width="65535*"/>
    </style:style>
    <style:style style:name="Table6.A1" style:family="table-cell">
      <style:table-cell-properties fo:padding="0.0382in" fo:border="0.5pt solid #000000"/>
    </style:style>
    <style:style style:name="Table8" style:family="table">
      <style:table-properties style:width="7.9in" table:align="margins"/>
    </style:style>
    <style:style style:name="Table8.A" style:family="table-column">
      <style:table-column-properties style:column-width="7.9in" style:rel-column-width="65535*"/>
    </style:style>
    <style:style style:name="Table8.A1" style:family="table-cell">
      <style:table-cell-properties fo:padding="0.0382in" fo:border="0.5pt solid #000000"/>
    </style:style>
    <style:style style:name="P1" style:family="paragraph" style:parent-style-name="Table_20_Contents" style:list-style-name="L1">
      <style:text-properties officeooo:paragraph-rsid="0028b48b"/>
    </style:style>
    <style:style style:name="P2" style:family="paragraph" style:parent-style-name="Table_20_Contents" style:list-style-name="L1">
      <style:text-properties officeooo:rsid="002c1f30" officeooo:paragraph-rsid="002c1f30"/>
    </style:style>
    <style:style style:name="P3" style:family="paragraph" style:parent-style-name="Table_20_Contents" style:list-style-name="L1">
      <style:text-properties officeooo:rsid="002c901f" officeooo:paragraph-rsid="002c901f"/>
    </style:style>
    <style:style style:name="P4" style:family="paragraph" style:parent-style-name="Table_20_Contents" style:list-style-name="L1">
      <style:text-properties officeooo:rsid="0028b48b" officeooo:paragraph-rsid="0028b48b"/>
    </style:style>
    <style:style style:name="P5" style:family="paragraph" style:parent-style-name="Table_20_Contents">
      <style:text-properties fo:background-color="#fff5ce"/>
    </style:style>
    <style:style style:name="P6" style:family="paragraph" style:parent-style-name="Table_20_Contents" style:list-style-name="L2">
      <style:text-properties officeooo:rsid="00394e95" officeooo:paragraph-rsid="00394e95"/>
    </style:style>
    <style:style style:name="P7" style:family="paragraph" style:parent-style-name="Table_20_Contents">
      <style:text-properties officeooo:rsid="00394e95" officeooo:paragraph-rsid="00394e95"/>
    </style:style>
    <style:style style:name="P8" style:family="paragraph" style:parent-style-name="Table_20_Contents">
      <style:text-properties officeooo:paragraph-rsid="00231a1a"/>
    </style:style>
    <style:style style:name="P9" style:family="paragraph" style:parent-style-name="Standard">
      <style:text-properties fo:color="#127622" loext:opacity="100%"/>
    </style:style>
    <style:style style:name="P10" style:family="paragraph" style:parent-style-name="Table_20_Contents" style:list-style-name="L3">
      <style:text-properties officeooo:rsid="001f8781" officeooo:paragraph-rsid="001f8781"/>
    </style:style>
    <style:style style:name="P11" style:family="paragraph" style:parent-style-name="Table_20_Contents">
      <style:text-properties officeooo:rsid="001f8781" officeooo:paragraph-rsid="001f8781"/>
    </style:style>
    <style:style style:name="P12" style:family="paragraph" style:parent-style-name="Table_20_Contents" style:list-style-name="L4">
      <style:text-properties officeooo:rsid="0037cdba" officeooo:paragraph-rsid="0037cdba"/>
    </style:style>
    <style:style style:name="T1" style:family="text">
      <style:text-properties fo:color="#127622" loext:opacity="100%"/>
    </style:style>
    <style:style style:name="T2" style:family="text">
      <style:text-properties fo:background-color="#fff5ce" loext:char-shading-value="0"/>
    </style:style>
    <style:style style:name="T3" style:family="text">
      <style:text-properties style:text-position="super 58%" officeooo:rsid="00143bce" fo:background-color="transparent" loext:char-shading-value="0"/>
    </style:style>
    <style:style style:name="T4" style:family="text">
      <style:text-properties officeooo:rsid="0028b48b"/>
    </style:style>
    <style:style style:name="T5" style:family="text">
      <style:text-properties officeooo:rsid="00143bce" fo:background-color="#fff5ce" loext:char-shading-value="0"/>
    </style:style>
    <style:style style:name="T6" style:family="text">
      <style:text-properties officeooo:rsid="00163f00"/>
    </style:style>
    <style:style style:name="T7" style:family="text">
      <style:text-properties officeooo:rsid="0019d0f0"/>
    </style:style>
    <style:style style:name="T8" style:family="text">
      <style:text-properties officeooo:rsid="001aff32"/>
    </style:style>
    <style:style style:name="T9" style:family="text">
      <style:text-properties style:text-position="super 58%"/>
    </style:style>
    <style:style style:name="T10" style:family="text">
      <style:text-properties officeooo:rsid="0026f38c"/>
    </style:style>
    <style:style style:name="T11" style:family="text">
      <style:text-properties officeooo:rsid="00282215"/>
    </style:style>
    <style:style style:name="T12" style:family="text">
      <style:text-properties officeooo:rsid="002621e0"/>
    </style:style>
    <style:style style:name="T13" style:family="text">
      <style:text-properties style:text-position="33% 80%"/>
    </style:style>
    <style:style style:name="T14" style:family="text">
      <style:text-properties fo:background-color="#fffb00" loext:char-shading-value="0" loext:padding="0.0193in" loext:border="0.74pt solid #d8c79d"/>
    </style:style>
    <style:style style:name="T15" style:family="text">
      <style:text-properties style:text-position="super 58%" fo:background-color="#fffb00" loext:char-shading-value="0" loext:padding="0.0193in" loext:border="0.74pt solid #d8c79d"/>
    </style:style>
    <style:style style:name="T16" style:family="text">
      <style:text-properties fo:color="#ff0000" loext:opacity="100%"/>
    </style:style>
    <style:style style:name="T17" style:family="text">
      <style:text-properties fo:color="#ff0000" loext:opacity="100%" fo:background-color="#fff5ce" loext:char-shading-value="0"/>
    </style:style>
    <style:style style:name="T18" style:family="text">
      <style:text-properties fo:color="#ff0000" loext:opacity="100%" fo:background-color="transparent" loext:char-shading-value="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able_20_Contents"/>
      <text:p text:style-name="Table_20_Contents"/>
      <text:p text:style-name="Table_20_Contents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span text:style-name="T1">Esther 2:7</text:span><text:line-break/>And he brought up <text:span text:style-name="T2">Hadassah</text:span><text:span text:style-name="T3">H1919</text:span>, that is, Esther, his uncle's daughter: for she had neither father nor mother, and the maid was fair and beautiful; whom Mordecai, when her father and mother were dead, took for his own daughter.</text:p>
          </table:table-cell>
        </table:table-row>
      </table:table>
      <text:list text:style-name="L1">
        <text:list-item>
          <text:p text:style-name="P1"><text:span text:style-name="T4">Ester’s Persian name is derived from an Old Persian word “</text:span>stāra”, <text:span text:style-name="T4">Modern Persian “setareh” which both mean “star”.</text:span></text:p>
          <text:list>
            <text:list-item>
              <text:p text:style-name="P2">Some suggest that her name is associated with “Ishtar”, a Babylonian &amp; Akkadian idol associated with the planet “Venus”.</text:p>
              <text:list>
                <text:list-item>
                  <text:p text:style-name="P2">Venus was also known as the “morning star” and the “evening star”.</text:p>
                </text:list-item>
                <text:list-item>
                  <text:p text:style-name="P3"><text:span text:style-name="T1">Revelation 22:16</text:span>: Jesus calls Himself the “bright and morning star” and there is no doubt that Esther is also a picture of Jesus.</text:p>
                </text:list-item>
              </text:list>
            </text:list-item>
          </text:list>
        </text:list-item>
        <text:list-item>
          <text:p text:style-name="P4">Ester’s Hebrew name, Hadassah, is the feminine of a Hebrew word that means “myrtle” or “myrtle tree”.</text:p>
        </text:list-item>
      </text:list>
      <text:p text:style-name="Table_20_Contents"/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H1919</text:p>
            <text:p text:style-name="Table_20_Contents">הֲדַסָּה (Hădaççâh | had-as-saw')</text:p>
            <text:p text:style-name="Table_20_Contents">Derivation: feminine of <text:span text:style-name="T5">H1918</text:span>;</text:p>
            <text:p text:style-name="Table_20_Contents"><text:span text:style-name="T6">KJV</text:span>: Hadassah (Esther)</text:p>
            <text:p text:style-name="Table_20_Contents"/>
            <text:p text:style-name="P5">H1918</text:p>
            <text:p text:style-name="Table_20_Contents">הֲדַס (hădaç | had-as')</text:p>
            <text:p text:style-name="Table_20_Contents">Derivation: of uncertain derivation;</text:p>
            <text:p text:style-name="Table_20_Contents">KJV: myrtle, <text:span text:style-name="T7">myrtle tree, </text:span><text:span text:style-name="T8">myrtle trees</text:span></text:p>
          </table:table-cell>
        </table:table-row>
      </table:table>
      <text:p text:style-name="Table_20_Contents"/>
      <text:p text:style-name="Table_20_Contents"/>
      <table:table table:name="Table9" table:style-name="Table9">
        <table:table-column table:style-name="Table9.A"/>
        <table:table-row>
          <table:table-cell table:style-name="Table9.A1" office:value-type="string">
            <text:p text:style-name="Table_20_Contents"><text:span text:style-name="T1">Isaiah 61:10</text:span><text:line-break/>I will greatly rejoice in the LORD, my soul shall be joyful in my God; for he hath clothed me with the garments of salvation, he hath covered me with the robe of righteousness, as a <text:span text:style-name="T2">bridegroom decketh himself with ornaments</text:span>, and as <text:span text:style-name="T2">a bride adorneth herself with her jewels</text:span>.</text:p>
          </table:table-cell>
        </table:table-row>
      </table:table>
      <text:list text:style-name="L2">
        <text:list-item>
          <text:p text:style-name="P6">Evidently, before the destruction of the 2<text:span text:style-name="T9">nd</text:span> temple it was more common for both the bride and the bridegroom to wear wreaths of myrtle which “has a fresh, crisp, and camphor-like scent with notes of citrus and eucalyptus”.</text:p>
        </text:list-item>
      </text:list>
      <text:p text:style-name="P7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Table_20_Contents"><text:span text:style-name="T1">Zechariah 9:16</text:span><text:line-break/>And the LORD their God shall save them in that day as the flock of his people:<text:line-break/>for they shall be as the stones of <text:span text:style-name="T2">a crown</text:span>, lifted up as an ensign upon his land.</text:p>
          </table:table-cell>
        </table:table-row>
      </table:table>
      <text:p text:style-name="P7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><text:soft-page-break/></text:p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span text:style-name="T1">2 Chronicles 33:11</text:span> <text:span text:style-name="T10">(</text:span><text:span text:style-name="T11">the enemy</text:span><text:span text:style-name="T10">)</text:span><text:line-break/>Wherefore the LORD brought upon them the captains of the host of the king of Assyria, <text:span text:style-name="T2">which took Manasseh among the thorns</text:span>, and bound him with fetters, and carried him to <text:span text:style-name="T2">Babylon</text:span>.</text:p>
            <text:p text:style-name="Table_20_Contents"/>
            <text:p text:style-name="Table_20_Contents"><text:span text:style-name="T1">Isaiah 9:18</text:span> <text:span text:style-name="T10">(judgment on the wicked)</text:span><text:line-break/>For wickedness burneth as the <text:span text:style-name="T2">fire</text:span>: it <text:span text:style-name="T2">shall devour the briers and thorns</text:span>, and shall kindle in the thickets of the forest, and they shall mount up like the lifting up of smoke.</text:p>
            <text:p text:style-name="Table_20_Contents"/>
            <text:p text:style-name="Table_20_Contents"><text:span text:style-name="T1">Isaiah 10:17</text:span> <text:span text:style-name="T12">(the wicked)</text:span></text:p>
            <text:p text:style-name="P8">And the light of Israel shall be for a fire, and his Holy One for a flame: and it shall burn and devour his <text:span text:style-name="T2">thorns</text:span> and his <text:span text:style-name="T2">briers</text:span> in one day;</text:p>
            <text:p text:style-name="P8"/>
            <text:p text:style-name="Table_20_Contents"><text:span text:style-name="T1">Isaiah 32:13</text:span> <text:span text:style-name="T12">(Babylonian)</text:span><text:line-break/>Upon the land of my people shall come up <text:span text:style-name="T2">thorns</text:span> and <text:span text:style-name="T2">briers</text:span>; yea, upon all the houses of joy in the joyous city:</text:p>
          </table:table-cell>
        </table:table-row>
      </table:table>
      <text:p text:style-name="Table_20_Contents"/>
      <table:table table:name="Table7" table:style-name="Table7">
        <table:table-column table:style-name="Table7.A"/>
        <table:table-row>
          <table:table-cell table:style-name="Table7.A1" office:value-type="string">
            <text:p text:style-name="Table_20_Contents"><text:span text:style-name="T1">2 Samuel 23:6-7</text:span><text:line-break/><text:span text:style-name="T13">6</text:span> But the sons of Belial shall be all of them as <text:span text:style-name="T2">thorns</text:span> thrust away, because <text:span text:style-name="T2">they cannot be taken with hands</text:span>: <text:span text:style-name="T13">7</text:span> But the man that shall touch them must be fenced with iron and the staff of a spear;<text:line-break/>and <text:span text:style-name="T2">they shall be utterly burned with fire</text:span> in the same place.</text:p>
          </table:table-cell>
        </table:table-row>
      </table:table>
      <text:p text:style-name="Table_20_Contents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9">Isa 41:19</text:p>
          </table:table-cell>
          <table:table-cell table:style-name="Table4.B1" office:value-type="string">
            <text:p text:style-name="Standard">I will plant in the wilderness the cedar, the shittah tree<text:span text:style-name="T14">, and the myrtle</text:span><text:span text:style-name="T15">H1918</text:span>, and the oil tree; I will set in the desert the fir tree, and the pine, and the box tree together:</text:p>
          </table:table-cell>
        </table:table-row>
        <table:table-row>
          <table:table-cell table:style-name="Table4.A2" office:value-type="string">
            <text:p text:style-name="P9">Isa 55:13</text:p>
          </table:table-cell>
          <table:table-cell table:style-name="Table4.B2" office:value-type="string">
            <text:p text:style-name="Standard">Instead of the <text:span text:style-name="T2">thorn</text:span> shall come up the fir tree, and instead of the <text:span text:style-name="T2">brier</text:span> shall come up <text:span text:style-name="T14">the myrtle tree</text:span><text:span text:style-name="T15">H1918</text:span>: and it shall be to the LORD for a name, for an everlasting sign that shall not be cut off.</text:p>
          </table:table-cell>
        </table:table-row>
        <table:table-row>
          <table:table-cell table:style-name="Table4.A2" office:value-type="string">
            <text:p text:style-name="P9">Zec 1:8</text:p>
          </table:table-cell>
          <table:table-cell table:style-name="Table4.B2" office:value-type="string">
            <text:p text:style-name="Standard">I saw by night, and behold a man riding upon a red horse, and he stood <text:span text:style-name="T14">among the myrtle trees</text:span><text:span text:style-name="T15">H1918</text:span> that were in the bottom; and behind him were there red horses, speckled, and white.</text:p>
          </table:table-cell>
        </table:table-row>
        <table:table-row>
          <table:table-cell table:style-name="Table4.A2" office:value-type="string">
            <text:p text:style-name="P9">Zec 1:10</text:p>
          </table:table-cell>
          <table:table-cell table:style-name="Table4.B2" office:value-type="string">
            <text:p text:style-name="Standard">And the man that stood <text:span text:style-name="T14">among the myrtle trees</text:span><text:span text:style-name="T15">H1918</text:span> answered and said, These are they whom the LORD hath sent to walk to and fro through the earth.</text:p>
          </table:table-cell>
        </table:table-row>
        <table:table-row>
          <table:table-cell table:style-name="Table4.A2" office:value-type="string">
            <text:p text:style-name="P9">Zec 1:11</text:p>
          </table:table-cell>
          <table:table-cell table:style-name="Table4.B2" office:value-type="string">
            <text:p text:style-name="Standard">And they answered the angel of the LORD that stood <text:span text:style-name="T14">among the myrtle trees</text:span><text:span text:style-name="T15">H1918</text:span>, and said, We have walked to and fro through the earth, and, behold, all the earth sitteth still, and is at rest.</text:p>
          </table:table-cell>
        </table:table-row>
      </table:table>
      <text:list text:style-name="L3">
        <text:list-item>
          <text:p text:style-name="P10">The myrtle tree is a symbol of Israel.</text:p>
        </text:list-item>
      </text:list>
      <text:p text:style-name="P11"><text:soft-page-break/></text:p>
      <text:p text:style-name="P11"/>
      <text:p text:style-name="P11"/>
      <text:p text:style-name="P11"/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<text:span text:style-name="T1">Genesis 3:17-18</text:span><text:line-break/>And unto Adam he said, Because thou hast hearkened unto the voice of thy wife, and hast eaten of the tree, of which I commanded thee, saying, Thou shalt not eat of it: cursed is the ground for thy sake; in sorrow shalt thou eat of it all the days of thy life; <text:span text:style-name="T13">18</text:span> <text:span text:style-name="T2">Thorns</text:span> also and <text:span text:style-name="T2">thistles</text:span> shall it bring forth to thee; and thou shalt eat the herb of the field;</text:p>
          </table:table-cell>
        </table:table-row>
      </table:table>
      <text:p text:style-name="P11"/>
      <text:p text:style-name="P11"/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><text:span text:style-name="T1">Hebrews 6:7-8</text:span><text:line-break/>For the earth which drinketh in the rain that cometh oft upon it, and bringeth forth herbs meet for them by whom it is dressed, receiveth blessing from God: <text:span text:style-name="T13">8</text:span> But that which beareth <text:span text:style-name="T2">thorns</text:span> and <text:span text:style-name="T2">briers</text:span> is <text:span text:style-name="T2">rejected</text:span>, and is nigh unto cursing; <text:span text:style-name="T2">whose end is to be burned</text:span>.</text:p>
          </table:table-cell>
        </table:table-row>
      </table:table>
      <text:p text:style-name="P11"/>
      <text:p text:style-name="P11"/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><text:span text:style-name="T1">Matthew 13:24-30</text:span><text:line-break/><text:span text:style-name="T13">24</text:span> Another parable put he forth unto them, saying, <text:span text:style-name="T16">The kingdom of heaven is likened unto a man which sowed good seed in his field:</text:span> <text:span text:style-name="T13">25</text:span> <text:span text:style-name="T16">But while men slept, his enemy came and sowed </text:span><text:span text:style-name="T17">tares</text:span><text:span text:style-name="T16"> among the </text:span><text:span text:style-name="T18">wheat</text:span><text:span text:style-name="T16">, and went his way.</text:span> <text:span text:style-name="T13">26</text:span> <text:span text:style-name="T16">But when the blade was sprung up, and brought forth fruit, then appeared the tares also.</text:span> <text:span text:style-name="T13">27</text:span> <text:span text:style-name="T16">So the servants of the householder came and said unto him, Sir, didst not thou sow good seed in thy field? from whence then hath it tares?</text:span> <text:span text:style-name="T13">28</text:span> <text:span text:style-name="T16">He said unto them, An enemy hath done this. The servants said unto him, Wilt thou then that we go and gather them up?</text:span> <text:span text:style-name="T13">29</text:span> <text:span text:style-name="T16">But he said, Nay; lest while ye gather up the tares, ye root up also the wheat with them.</text:span> <text:span text:style-name="T13">30</text:span> <text:span text:style-name="T16">Let both grow together until the harvest: and in the time of harvest I will say to the reapers, Gather ye together first the </text:span><text:span text:style-name="T17">tares</text:span><text:span text:style-name="T16">, and bind them in bundles to </text:span><text:span text:style-name="T17">burn them</text:span><text:span text:style-name="T16">: but gather the wheat into my barn.</text:span></text:p>
          </table:table-cell>
        </table:table-row>
      </table:table>
      <text:list text:style-name="L4">
        <text:list-item>
          <text:p text:style-name="P12">Tares, also known as false wheat, produce poisonous fruit (seeds)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fo:padding="0.0201in" fo:border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1T16:07:21.926954700</meta:creation-date>
    <dc:title>default</dc:title>
    <meta:editing-duration>PT2H1M57S</meta:editing-duration>
    <meta:editing-cycles>41</meta:editing-cycles>
    <meta:generator>LibreOffice/26.2.4.2$Linux_X86_64 LibreOffice_project/64a984c51f4702dbd3710b13428c673a2f1292e7</meta:generator>
    <meta:initial-creator>William K. McDannell Jr.</meta:initial-creator>
    <dc:date>2026-07-11T12:19:41.041435211</dc:date>
    <meta:document-statistic meta:table-count="10" meta:image-count="0" meta:object-count="0" meta:page-count="3" meta:paragraph-count="38" meta:word-count="991" meta:character-count="5236" meta:non-whitespace-character-count="4291"/>
    <meta:template xlink:type="simple" xlink:actuate="onRequest" xlink:title="default" xlink:href="../../../../AppData/Roaming/LibreOffice/4/user/template/default.ott" meta:date="2025-10-01T16:07:21.682253100"/>
  </office:meta>
</office:document-meta>
</file>