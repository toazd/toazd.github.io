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80000002E00FC3F825.png" manifest:media-type="image/png"/>
  <manifest:file-entry manifest:full-path="Pictures/100000010000043D000002C9AB4AFFF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014in" fo:margin-left="0in" table:align="left" style:writing-mode="lr-tb"/>
    </style:style>
    <style:style style:name="Table5.A" style:family="table-column">
      <style:table-column-properties style:column-width="0.7118in"/>
    </style:style>
    <style:style style:name="Table5.B" style:family="table-column">
      <style:table-column-properties style:column-width="1.5611in"/>
    </style:style>
    <style:style style:name="Table5.C" style:family="table-column">
      <style:table-column-properties style:column-width="5.6285in"/>
    </style:style>
    <style:style style:name="Table5.A1" style:family="table-cell">
      <style:table-cell-properties style:vertical-align="middle" fo:padding="0.0201in" fo:border-left="0.75pt solid #000000" fo:border-right="none" fo:border-top="0.75pt solid #000000" fo:border-bottom="0.75pt solid #000000"/>
    </style:style>
    <style:style style:name="Table5.C1" style:family="table-cell">
      <style:table-cell-properties style:vertical-align="middle" fo:padding="0.0201in" fo:border="0.75pt solid #000000"/>
    </style:style>
    <style:style style:name="Table5.A2" style:family="table-cell">
      <style:table-cell-properties style:vertical-align="middle" fo:padding="0.0201in" fo:border-left="0.75pt solid #000000" fo:border-right="none" fo:border-top="none" fo:border-bottom="0.75pt solid #000000"/>
    </style:style>
    <style:style style:name="Table5.C2" style:family="table-cell">
      <style:table-cell-properties style:vertical-align="middle" fo:padding="0.0201in" fo:border-left="0.75pt solid #000000" fo:border-right="0.75pt solid #000000" fo:border-top="none" fo:border-bottom="0.75pt solid #000000"/>
    </style:style>
    <style:style style:name="Table6" style:family="table">
      <style:table-properties style:width="7.9in" table:align="margins" style:writing-mode="lr-tb"/>
    </style:style>
    <style:style style:name="Table6.A" style:family="table-column">
      <style:table-column-properties style:column-width="0.9389in" style:rel-column-width="1352*"/>
    </style:style>
    <style:style style:name="Table6.B" style:family="table-column">
      <style:table-column-properties style:column-width="2.0611in" style:rel-column-width="2968*"/>
    </style:style>
    <style:style style:name="Table6.C" style:family="table-column">
      <style:table-column-properties style:column-width="4.9in" style:rel-column-width="7056*"/>
    </style:style>
    <style:style style:name="Table6.A1" style:family="table-cell">
      <style:table-cell-properties style:vertical-align="middle" fo:padding="0in" fo:border-left="0.75pt solid #000000" fo:border-right="none" fo:border-top="0.75pt solid #000000" fo:border-bottom="0.75pt solid #000000"/>
    </style:style>
    <style:style style:name="Table6.C1" style:family="table-cell">
      <style:table-cell-properties style:vertical-align="middle" fo:padding="0in" fo:border="0.75pt solid #000000"/>
    </style:style>
    <style:style style:name="Table6.A2" style:family="table-cell">
      <style:table-cell-properties style:vertical-align="middle" fo:padding="0in" fo:border-left="0.75pt solid #000000" fo:border-right="none" fo:border-top="none" fo:border-bottom="0.75pt solid #000000"/>
    </style:style>
    <style:style style:name="Table6.C2" style:family="table-cell">
      <style:table-cell-properties style:vertical-align="middle" fo:padding="0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fo:font-weight="bold" officeooo:rsid="00420489" officeooo:paragraph-rsid="00420489" style:font-weight-asian="bold" style:font-weight-complex="bold"/>
    </style:style>
    <style:style style:name="P2" style:family="paragraph" style:parent-style-name="Table_20_Contents">
      <style:text-properties officeooo:rsid="001443d5" officeooo:paragraph-rsid="001443d5"/>
    </style:style>
    <style:style style:name="P3" style:family="paragraph" style:parent-style-name="Table_20_Contents">
      <style:paragraph-properties fo:text-align="center" style:justify-single-word="false"/>
      <style:text-properties fo:font-weight="bold" officeooo:rsid="0018ac85" officeooo:paragraph-rsid="0018ac85"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1d8c42" officeooo:paragraph-rsid="001d8c42" style:font-weight-asian="bold" style:font-weight-complex="bold"/>
    </style:style>
    <style:style style:name="P6" style:family="paragraph" style:parent-style-name="Table_20_Contents">
      <style:paragraph-properties fo:text-align="center" style:justify-single-word="false"/>
      <style:text-properties fo:font-weight="bold" officeooo:rsid="00211ac7" officeooo:paragraph-rsid="00217ddb" style:font-weight-asian="bold" style:font-weight-complex="bold"/>
    </style:style>
    <style:style style:name="P7" style:family="paragraph" style:parent-style-name="Table_20_Contents">
      <style:text-properties officeooo:rsid="00211ac7" officeooo:paragraph-rsid="00217ddb"/>
    </style:style>
    <style:style style:name="P8" style:family="paragraph" style:parent-style-name="Text_20_body">
      <style:paragraph-properties fo:margin-left="0in" fo:margin-right="0in" fo:margin-top="0in" fo:margin-bottom="0in" style:contextual-spacing="false" fo:line-height="114%" fo:text-indent="0in" style:auto-text-indent="false"/>
      <style:text-properties style:font-name="Google Sans Text"/>
    </style:style>
    <style:style style:name="P9" style:family="paragraph" style:parent-style-name="Text_20_body">
      <style:paragraph-properties fo:margin-left="0in" fo:margin-right="0in" fo:margin-top="0in" fo:margin-bottom="0in" style:contextual-spacing="false" fo:line-height="114%" fo:text-indent="0in" style:auto-text-indent="false"/>
      <style:text-properties style:font-name="Liberation Sans" fo:font-size="12pt" style:font-size-asian="12pt" style:font-size-complex="12pt"/>
    </style:style>
    <style:style style:name="P10" style:family="paragraph" style:parent-style-name="Table_20_Contents">
      <style:paragraph-properties fo:text-align="center" style:justify-single-word="false"/>
      <style:text-properties fo:font-weight="bold" officeooo:rsid="003033f1" officeooo:paragraph-rsid="003033f1" style:font-weight-asian="bold" style:font-weight-complex="bold"/>
    </style:style>
    <style:style style:name="P11" style:family="paragraph" style:parent-style-name="Text_20_body">
      <style:paragraph-properties fo:margin-left="0in" fo:margin-right="0in" fo:margin-top="0in" fo:margin-bottom="0in" style:contextual-spacing="false" fo:line-height="114%" fo:orphans="0" fo:widows="0" fo:text-indent="0in" style:auto-text-indent="false"/>
    </style:style>
    <style:style style:name="P12"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13" style:family="paragraph" style:parent-style-name="Table_20_Contents">
      <style:paragraph-properties fo:margin-left="0in" fo:margin-right="0in" fo:text-align="center" style:justify-single-word="false" fo:text-indent="0in" style:auto-text-indent="false"/>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text-properties officeooo:rsid="003ab64c" officeooo:paragraph-rsid="003ab64c"/>
    </style:style>
    <style:style style:name="P16" style:family="paragraph" style:parent-style-name="Table_20_Contents">
      <style:paragraph-properties fo:text-align="center" style:justify-single-word="false"/>
      <style:text-properties officeooo:rsid="003ab64c" officeooo:paragraph-rsid="003ab64c"/>
    </style:style>
    <style:style style:name="T1" style:family="text">
      <style:text-properties officeooo:rsid="001633d9"/>
    </style:style>
    <style:style style:name="T2" style:family="text">
      <style:text-properties officeooo:rsid="0016984d"/>
    </style:style>
    <style:style style:name="T3" style:family="text">
      <style:text-properties officeooo:rsid="00186d23"/>
    </style:style>
    <style:style style:name="T4" style:family="text">
      <style:text-properties fo:font-weight="bold" style:font-weight-asian="bold" style:font-weight-complex="bold"/>
    </style:style>
    <style:style style:name="T5" style:family="text">
      <style:text-properties officeooo:rsid="0027a08a"/>
    </style:style>
    <style:style style:name="T6" style:family="text">
      <style:text-properties officeooo:rsid="00217ddb"/>
    </style:style>
    <style:style style:name="T7" style:family="text">
      <style:text-properties fo:font-weight="bold"/>
    </style:style>
    <style:style style:name="T8" style:family="text">
      <style:text-properties fo:font-style="italic"/>
    </style:style>
    <style:style style:name="T9" style:family="text">
      <style:text-properties fo:font-weight="bold" officeooo:rsid="002eeabd"/>
    </style:style>
    <style:style style:name="T10" style:family="text">
      <style:text-properties style:font-name="Google Sans Text"/>
    </style:style>
    <style:style style:name="T11" style:family="text">
      <style:text-properties style:font-name="Google Sans Text" fo:font-weight="bold"/>
    </style:style>
    <style:style style:name="T12" style:family="text">
      <style:text-properties officeooo:rsid="0041cc37"/>
    </style:style>
    <style:style style:name="T13" style:family="text">
      <style:text-properties officeooo:rsid="00408a72"/>
    </style:style>
    <style:style style:name="T14" style:family="text">
      <style:text-properties officeooo:rsid="003c42b7"/>
    </style:style>
    <style:style style:name="T15" style:family="text">
      <style:text-properties fo:color="#127622" loext:opacity="100%"/>
    </style:style>
    <style:style style:name="T16" style:family="text">
      <style:text-properties style:text-position="33% 80%"/>
    </style:style>
    <style:style style:name="T17" style:family="text">
      <style:text-properties fo:background-color="#fff5ce"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he date of the eclipse of 763BC to date Biblical events.</text:p>
      <text:p text:style-name="Table_20_Contents"/>
      <text:p text:style-name="P2">According the NASA’s graphic of the solar eclipse of June 15, 762BC Ninevah would have experienced a total solar eclipse on June 15 763BC <text:span text:style-name="T1">at 11:06AM. </text:span><text:span text:style-name="T2">Google’s Gemini Pro was used to overlay the total solar eclipse path from their info graphic available at </text:span><text:a xlink:type="simple" xlink:href="https://eclipse.gsfc.nasa.gov/SEhistory/SEplot/SE-0762Jun15T.pdf" text:style-name="Internet_20_link" text:visited-style-name="Visited_20_Internet_20_Link"><text:span text:style-name="T2">https://eclipse.gsfc.nasa.gov/SEhistory/SEplot/SE-0762Jun15T.pdf</text:span></text:a><text:span text:style-name="T2"> to a map showing the city of Ninevah from the software Biblemapper 3.0. </text:span><text:span text:style-name="T3">It was also used to calculate the timing of the total solar eclipse at the city of Ninevah:<text:line-break/></text:span></text:p>
      <table:table table:name="Table1" table:style-name="Table1">
        <table:table-column table:style-name="Table1.A"/>
        <table:table-row>
          <table:table-cell table:style-name="Table1.A1" office:value-type="string">
            <text:p text:style-name="P3">Time of day</text:p>
            <text:p text:style-name="Table_20_Contents">While the exact time of totality at Nineveh isn't provided in a single, simple number in the available data, the eclipse occurred at a time corresponding to the Babylonian month Simanu. More specifically:</text:p>
            <text:p text:style-name="Table_20_Contents"/>
            <text:p text:style-name="Table_20_Contents">Greatest Eclipse (Global Maximum): The moment of greatest eclipse occurred at 08:14:01.4 UT (Universal Time).</text:p>
            <text:p text:style-name="Table_20_Contents"/>
            <text:p text:style-name="Table_20_Contents">Nineveh Local Time: Nineveh's longitude is approximately 43∘ E. To estimate its local time, we can approximate the difference from UT (which is based on the Prime Meridian, 0∘ longitude). Since Earth rotates 15∘ per hour, 43∘/15∘≈2.87 hours, or roughly 2 hours and 52 minutes, ahead of UT.</text:p>
            <text:p text:style-name="Table_20_Contents"/>
            <text:p text:style-name="Table_20_Contents">Estimated Local Time of Greatest Eclipse: 08:14 UT+2 hours and 52 minutes≈11:06 AM local time.</text:p>
            <text:p text:style-name="Table_20_Contents"/>
            <text:p text:style-name="P4">Duration at Nineveh</text:p>
            <text:p text:style-name="Table_20_Contents">For the city of Nineveh itself:</text:p>
            <text:p text:style-name="Table_20_Contents"/>
            <text:p text:style-name="Table_20_Contents">Maximum Duration of Totality: The duration of totality would have been less than 5 minutes and 0.2 seconds. Astronomical calculations suggest Nineveh was either right on the southern edge of the path of totality or just outside of it.</text:p>
            <text:p text:style-name="Table_20_Contents"/>
            <text:p text:style-name="Table_20_Contents">Near-Total or Grazing Totality: If Nineveh experienced totality, it would have been a grazing totality lasting likely for less than one minute. If the city center was just outside the path, the eclipse would have been near-total (over 99% coverage), resulting in profound, midday darkness, but technically zero seconds of totality.</text:p>
            <text:p text:style-name="Table_20_Contents"/>
            <text:p text:style-name="Table_20_Contents">Total Duration of the Event: The entire event, from the moment the Moon first touched the Sun (First Contact) until it completely left (Last Contact), would have lasted for approximately 2 hours and 33 minutes.</text:p>
          </table:table-cell>
        </table:table-row>
      </table:table>
      <text:p text:style-name="P2"/>
      <text:p text:style-name="P2"/>
      <text:p text:style-name="P2"/>
      <text:p text:style-name="P2"/>
      <text:p text:style-name="P2"><text:soft-page-break/><draw:frame draw:style-name="fr1" draw:name="Image1" text:anchor-type="as-char" svg:width="7.8598in" svg:height="4.1083in" draw:z-index="0"><draw:image xlink:href="Pictures/1000000000000580000002E00FC3F825.png" xlink:type="simple" xlink:show="embed" xlink:actuate="onLoad" draw:mime-type="image/png"/></draw:frame></text:p>
      <text:p text:style-name="P2"/>
      <text:p text:style-name="P5">The Assyrian clay tablet that records the event:</text:p>
      <table:table table:name="Table2" table:style-name="Table2">
        <table:table-column table:style-name="Table2.A"/>
        <table:table-row>
          <table:table-cell table:style-name="Table2.A1" office:value-type="string">
            <text:p text:style-name="Table_20_Contents"><text:span text:style-name="T4">1</text:span>. The Historical Record: The Assyrian Eponym Canon</text:p>
            <text:p text:style-name="Table_20_Contents"/>
            <text:p text:style-name="Table_20_Contents">The specific text is found in the Assyrian Eponym Canon, a crucial historical document of the ancient Near East. This Canon is a list of officials (limmu or eponyms) after whom each year was named.</text:p>
            <text:p text:style-name="Table_20_Contents"/>
            <text:p text:style-name="Table_20_Contents">The relevant entry, which corresponds to the ninth year of King Ashur-dan III's reign, is remarkably short:</text:p>
            <text:p text:style-name="Table_20_Contents"/>
            <text:p text:style-name="Table_20_Contents">"[year of] Bur-Sagale of Guzana. Revolt in the city of Assur. In the month Simanu an eclipse of the sun took place."</text:p>
            <text:p text:style-name="Table_20_Contents"/>
            <text:p text:style-name="Table_20_Contents">This is also known as the Bur-Sagale eclipse after the official named in the record. The cuneiform phrase used to describe the event—shamash akallu, meaning "the Sun was obscured" or "bent"—is interpreted by scholars as a clear reference to a solar eclipse.</text:p>
            <text:p text:style-name="Table_20_Contents"/>
            <text:p text:style-name="Table_20_Contents"><text:span text:style-name="T4">2</text:span>. The Astronomical Confirmation</text:p>
            <text:p text:style-name="Table_20_Contents">Historians were able to take the relative dates of the Eponym Canon and match them precisely to a modern calendar by using this single, datable astronomical event.</text:p>
            <text:p text:style-name="Table_20_Contents"/>
            <text:p text:style-name="Table_20_Contents">Astronomers were able to perform calculations backward through time to determine exactly when a solar eclipse would have been visible over Assyria (near the capital, Nineveh) in the month of Simanu (which corresponds to May/June) during the period indicated by the Canon.</text:p>
            <text:p text:style-name="Table_20_Contents"/>
            <text:p text:style-name="Table_20_Contents">The only total or near-total solar eclipse that fits the location and timeframe is the one that occurred on June 15, 763 BC (in the proleptic Julian calendar).</text:p>
            <text:p text:style-name="Table_20_Contents"/>
            <text:p text:style-name="Table_20_Contents">This combined historical and astronomical evidence provides the anchor date for the entire chronology of the Neo-Assyrian period, which in turn helps synchronize the timelines of other civilizations, including ancient Israel and Judah.</text:p>
          </table:table-cell>
        </table:table-row>
      </table:table>
      <text:p text:style-name="P2"/>
      <text:p text:style-name="P6"><text:soft-page-break/>Finding anchoring dates in the Biblical text:</text:p>
      <text:p text:style-name="P7">(assumes Thieles work is a work containing significant error since h<text:span text:style-name="T5">is calculations</text:span> assumed there were errors in the Biblical text: refer to the “In conclusion” section of his book “The mysterious numbers of the Hebrew kings, by Thiele, Edwin Richard, 1895-1986” which outlines his assumptions including: “and of the fact that at some late date—long after the original records of the kings had been set in order and <text:span text:style-name="T4">when the true arrangement of the reigns had been forgotten</text:span>—<text:span text:style-name="T4">certain synchronisms in 2 Kings 17 and 18 were introduced by some late hand twelve years out of harmony with the original pattern of reigns</text:span>.”<text:span text:style-name="T6">)</text:span></text:p>
      <text:p text:style-name="P7"/>
      <table:table table:name="Table3" table:style-name="Table3">
        <table:table-column table:style-name="Table3.A"/>
        <table:table-row>
          <table:table-cell table:style-name="Table3.A1" office:value-type="string">
            <text:p text:style-name="P8">This is a crucial point in historical and Biblical studies, as it requires moving beyond the traditional methodology (like Thiele's, which you asked to ignore) and relying solely on the <text:span text:style-name="T7">integrity of the Biblical text</text:span> while leveraging external, absolutely dated anchors.</text:p>
            <text:p text:style-name="P9"/>
            <text:p text:style-name="Standard">The solar eclipse of <text:span text:style-name="T7">June 15, 763 BC</text:span> is the <text:span text:style-name="T7">absolute anchor</text:span> for the chronology of the entire Near East, and it is connected to the Biblical record through a chain of synchronization points, rather than by altering the Biblical regnal years. Here is the process of connecting the eclipse-anchored Assyrian timeline to the Biblical data without relying on the Thiele system:</text:p>
            <text:p text:style-name="Standard"/>
            <text:p text:style-name="Standard">1. The Fixed Anchor: Assyria</text:p>
            <text:p text:style-name="Standard">The Assyrian Eponym Canon (AEC), which records the eclipse, is established as an <text:span text:style-name="T7">absolute calendar</text:span> for the years surrounding 763 BC. The astronomical data from sources like the one you provided confirm the precise timing, magnitude (1.0596), and location for the <text:span text:style-name="T7">Total Solar Eclipse of 763 BC</text:span>. This means that the entire sequence of Assyrian kings and events, which are listed consecutively in the AEC, now have a fixed BC date.</text:p>
            <text:p text:style-name="Standard"/>
            <text:p text:style-name="Standard">2. The Biblical Link: External Synchronisms</text:p>
            <text:p text:style-name="Standard">The link is made by matching an event mentioned in the Bible with an event in the now-dated Assyrian records. This matching event does not require the manipulation or correction of the Biblical king lists.</text:p>
            <text:p text:style-name="Standard"/>
            <text:p text:style-name="Standard">A. Jehu's Tribute (841 BC)</text:p>
            <text:p text:style-name="Standard">The most critical link predates the eclipse by almost 80 years: <text:span text:style-name="T7">Assyrian Record:</text:span> The <text:span text:style-name="T7">Black Obelisk of Shalmaneser III</text:span> records the payment of tribute by <text:span text:style-name="T7">Jehu</text:span> (called <text:span text:style-name="T8">Iaua</text:span> on the obelisk), the king of Israel. The fixed Assyrian timeline dates this specific event to the 18th year of Shalmaneser III, which is <text:span text:style-name="T7">841 BC</text:span>.</text:p>
            <text:p text:style-name="Standard"><text:span text:style-name="T7">Biblical Connection:</text:span> The Biblical record states that Jehu began his reign by executing the dynasty of Ahab (2 Kings 9-10). The year of this event is now absolutely fixed by the Assyrian timeline to <text:span text:style-name="T7">841 BC</text:span>.</text:p>
            <text:p text:style-name="Standard"/>
            <text:p text:style-name="Standard">B. The Capture of Samaria (722/721 BC)</text:p>
            <text:p text:style-name="Standard">A later event provides confirmation and context for the end of the Northern Kingdom:</text:p>
            <text:p text:style-name="Standard"><text:span text:style-name="T7">Assyrian Record:</text:span> Assyrian royal inscriptions record the capture of the Israelite capital, <text:span text:style-name="T7">Samaria</text:span>, by King Sargon II. The fixed Assyrian timeline dates this event to <text:span text:style-name="T7">722/721 BC</text:span>.</text:p>
            <text:p text:style-name="Standard"><text:span text:style-name="T7">Biblical Connection:</text:span> The Bible states that Samaria was captured in the ninth year of <text:span text:style-name="T7">King Hoshea</text:span> (<text:span text:style-name="T7">2 Kings 17:6</text:span>).</text:p>
            <text:p text:style-name="Standard"/>
            <text:p text:style-name="Standard">3. Maintaining Biblical Integrity (The Inductive Method)</text:p>
            <text:p text:style-name="Standard">The crucial step, <text:span text:style-name="T4">favored by chronologists who maintain the internal integrity of the Biblical text</text:span>, is the <text:span text:style-name="T7">inductive method</text:span>. Instead of assuming the Biblical numbers are wrong and "fixing" them to fit the Assyrian line (the Thiele method), the inductive approach assumes the Biblical numbers are correct and works backward to <text:span text:style-name="T7">discover the counting rules</text:span> that allow the internal chronology to align with the external, fixed dates (like 841 BC and 722 BC).</text:p>
            <text:p text:style-name="Standard"/>
            <text:p text:style-name="Standard">The absolute dates for Jehu (841 BC) and the fall of Samaria (722/721 BC) serve as <text:span text:style-name="T7">bookends</text:span>. The task is then to:</text:p>
            <text:p text:style-name="Standard"/>
            <text:p text:style-name="Standard"><text:soft-page-break/><text:span text:style-name="T9">1. </text:span><text:span text:style-name="T7">Work the Biblical regnal numbers</text:span> (the "in the Xth year of" statements) forward from 841 BC to 722/721 BC.</text:p>
            <text:p text:style-name="Standard"/>
            <text:p text:style-name="Standard"><text:span text:style-name="T9">2. </text:span><text:span text:style-name="T7">Confirm the calculation</text:span> by aligning the resulting BC dates with every other instance of synchronized contact between Assyria (or Babylon/Judah) and Israel/Judah, such as Tiglath-Pileser III's contact with Menahem (<text:span text:style-name="T7">2 Kings 15:19</text:span>) and Sennacherib's siege of Jerusalem in the 14th year of Hezekiah (<text:span text:style-name="T7">2 Kings 18:13</text:span>), which the fixed Assyrian timeline dates to <text:span text:style-name="T7">701 BC</text:span>.</text:p>
            <text:p text:style-name="Standard"/>
            <text:p text:style-name="Standard">In this non-Thiele approach, the <text:span text:style-name="T7">763 BC eclipse</text:span> is vital because it establishes the foundational and reliable BC dates for the entire sequence of Assyrian events that are used as the <text:span text:style-name="T8">external validation</text:span> for the Biblical timeline. The Biblical numbers themselves are taken as the authoritative relative record, which is then made absolute by being anchored to the verified foreign record.</text:p>
          </table:table-cell>
        </table:table-row>
      </table:table>
      <text:p text:style-name="P7"/>
      <text:p text:style-name="P7"/>
      <text:p text:style-name="P10">Chronology using anchor dates and data from the Bible:</text:p>
      <table:table table:name="Table4" table:style-name="Table4">
        <table:table-column table:style-name="Table4.A"/>
        <table:table-row>
          <table:table-cell table:style-name="Table4.A1" office:value-type="string">
            <text:p text:style-name="P11"><text:span text:style-name="T10">The solar eclipse of </text:span><text:span text:style-name="T11">June 15, 763 BC</text:span><text:span text:style-name="T10"> serves as the </text:span><text:span text:style-name="T11">absolute chronological anchor</text:span><text:span text:style-name="T10"> that fixes the entire sequence of the Assyrian Eponym Canon. By assuming the precise, unbroken nature of the Assyrian record and the accuracy of the Biblical data, the following key historical events are synchronized without manipulating the regnal years found in the Books of Kings.</text:span></text:p>
          </table:table-cell>
        </table:table-row>
      </table:table>
      <text:p text:style-name="Table_20_Contents"/>
      <table:table table:name="Table5" table:style-name="Table5">
        <table:table-column table:style-name="Table5.A"/>
        <table:table-column table:style-name="Table5.B"/>
        <table:table-column table:style-name="Table5.C"/>
        <table:table-row>
          <table:table-cell table:style-name="Table5.A1" office:value-type="string">
            <text:p text:style-name="P12">Date (BC)</text:p>
          </table:table-cell>
          <table:table-cell table:style-name="Table5.A1" office:value-type="string">
            <text:p text:style-name="P12">Event</text:p>
          </table:table-cell>
          <table:table-cell table:style-name="Table5.C1" office:value-type="string">
            <text:p text:style-name="P12">Historical Context and Connection</text:p>
          </table:table-cell>
        </table:table-row>
        <table:table-row>
          <table:table-cell table:style-name="Table5.A2" office:value-type="string">
            <text:p text:style-name="P13">841<text:span text:style-name="T12">BC</text:span></text:p>
          </table:table-cell>
          <table:table-cell table:style-name="Table5.A2" office:value-type="string">
            <text:p text:style-name="P14">Jehu Pays Tribute to Assyria</text:p>
          </table:table-cell>
          <table:table-cell table:style-name="Table5.C2" office:value-type="string">
            <text:p text:style-name="P14">The primary anchor event. Assyrian records (the Black Obelisk of Shalmaneser III) confirm King Jehu of Israel paid tribute, absolutely fixing the start of the Biblical timeline at this point.</text:p>
          </table:table-cell>
        </table:table-row>
        <table:table-row>
          <table:table-cell table:style-name="Table5.A2" office:value-type="string">
            <text:p text:style-name="P13">763<text:span text:style-name="T12">BC</text:span></text:p>
          </table:table-cell>
          <table:table-cell table:style-name="Table5.A2" office:value-type="string">
            <text:p text:style-name="P14">The Bur-Sagale Solar Eclipse</text:p>
          </table:table-cell>
          <table:table-cell table:style-name="Table5.C2" office:value-type="string">
            <text:p text:style-name="P14">The absolute reference date for the Assyrian timeline. The total eclipse on June 15, 763 BC, had an eclipse magnitude of 1.0596 and occurred at 08:14:01.4 UT at its greatest point, as confirmed by astronomical calculation. This verifies the entire chronology of the Assyrian Eponym Canon.</text:p>
          </table:table-cell>
        </table:table-row>
        <table:table-row>
          <table:table-cell table:style-name="Table5.A2" office:value-type="string">
            <text:p text:style-name="P13">760<text:span text:style-name="T12">BC</text:span></text:p>
          </table:table-cell>
          <table:table-cell table:style-name="Table5.A2" office:value-type="string">
            <text:p text:style-name="P14">Amos's Prophetic Ministry/Earthquake</text:p>
          </table:table-cell>
          <table:table-cell table:style-name="Table5.C2" office:value-type="string">
            <text:p text:style-name="P14">This time period overlaps with the eclipse and a period of great internal turmoil in the Assyrian Empire (plagues, revolts). This aligns with the context of the prophet Amos, who refers to a major earthquake (Amos 1:1), a sign of judgment in the reign of Jeroboam II.</text:p>
          </table:table-cell>
        </table:table-row>
        <table:table-row>
          <table:table-cell table:style-name="Table5.A2" office:value-type="string">
            <text:p text:style-name="P13">722/721<text:span text:style-name="T12">BC</text:span></text:p>
          </table:table-cell>
          <table:table-cell table:style-name="Table5.A2" office:value-type="string">
            <text:p text:style-name="P14">Fall of Samaria</text:p>
          </table:table-cell>
          <table:table-cell table:style-name="Table5.C2" office:value-type="string">
            <text:p text:style-name="P14">The absolute date for the end of the Northern Kingdom of Israel. Biblical text states this occurred in the ninth year of King Hoshea (2 Kings 17:6), and this date is confirmed by the fixed Assyrian records of Sargon II.</text:p>
          </table:table-cell>
        </table:table-row>
        <table:table-row>
          <table:table-cell table:style-name="Table5.A2" office:value-type="string">
            <text:p text:style-name="P13">701<text:span text:style-name="T12">BC</text:span></text:p>
          </table:table-cell>
          <table:table-cell table:style-name="Table5.A2" office:value-type="string">
            <text:p text:style-name="P14">Sennacherib's Siege of Jerusalem</text:p>
          </table:table-cell>
          <table:table-cell table:style-name="Table5.C2" office:value-type="string">
            <text:p text:style-name="Table_20_Contents">A critical, late-period synchronization point. The Biblical account of King Hezekiah's struggle with Sennacherib (2 Kings 18:13) is dated to his 14th year, which aligns perfectly with the absolute date of the siege found in Sennacherib's own royal inscriptions.</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 table:name="Table6" table:style-name="Table6">
        <table:table-column table:style-name="Table6.A"/>
        <table:table-column table:style-name="Table6.B"/>
        <table:table-column table:style-name="Table6.C"/>
        <text:soft-page-break/>
        <table:table-row>
          <table:table-cell table:style-name="Table6.A1" office:value-type="string">
            <text:p text:style-name="P12">Date (BC)</text:p>
          </table:table-cell>
          <table:table-cell table:style-name="Table6.A1" office:value-type="string">
            <text:p text:style-name="P12">Event</text:p>
          </table:table-cell>
          <table:table-cell table:style-name="Table6.C1" office:value-type="string">
            <text:p text:style-name="P12">Historical Context and Connection</text:p>
          </table:table-cell>
        </table:table-row>
        <table:table-row>
          <table:table-cell table:style-name="Table6.A2" office:value-type="string">
            <text:p text:style-name="P13">793 – 753<text:span text:style-name="T13">BC</text:span></text:p>
          </table:table-cell>
          <table:table-cell table:style-name="Table6.A2" office:value-type="string">
            <text:p text:style-name="P14">Reign of King Jeroboam II</text:p>
          </table:table-cell>
          <table:table-cell table:style-name="Table6.C2" office:value-type="string">
            <text:p text:style-name="P14">This 41-year reign of the King of Israel (2 Kings 14:23) is established by using the anchored date of Jehu's tribute (841 BC) and counting through the intervening, confirmed Biblical regnal years. Jonah is explicitly dated to this era (2 Kings 14:25).</text:p>
          </table:table-cell>
        </table:table-row>
        <table:table-row>
          <table:table-cell table:style-name="Table6.A2" office:value-type="string">
            <text:p text:style-name="P13">765<text:span text:style-name="T13">BC</text:span></text:p>
          </table:table-cell>
          <table:table-cell table:style-name="Table6.A2" office:value-type="string">
            <text:p text:style-name="P14">Plague Strikes Assyria</text:p>
          </table:table-cell>
          <table:table-cell table:style-name="Table6.C2" office:value-type="string">
            <text:p text:style-name="P14">The Assyrian Eponym Canon (AEC) begins listing a series of calamities in the years leading up to the eclipse, contributing to a sense of divine displeasure and vulnerability in Nineveh.</text:p>
          </table:table-cell>
        </table:table-row>
        <table:table-row>
          <table:table-cell table:style-name="Table6.A2" office:value-type="string">
            <text:p text:style-name="P13">June 15, 763<text:span text:style-name="T13">BC</text:span></text:p>
          </table:table-cell>
          <table:table-cell table:style-name="Table6.A2" office:value-type="string">
            <text:p text:style-name="P14">Bur-Sagale Solar Eclipse</text:p>
          </table:table-cell>
          <table:table-cell table:style-name="Table6.C2" office:value-type="string">
            <text:p text:style-name="P14">(Assyrian Anchor) A near-total solar eclipse observed over the Assyrian capital of Nineveh. In ancient Mesopotamian culture, a solar eclipse was regarded as a terrifying omen of imminent divine judgment or the downfall of the king and the city.</text:p>
          </table:table-cell>
        </table:table-row>
        <table:table-row>
          <table:table-cell table:style-name="Table6.A2" office:value-type="string">
            <text:p text:style-name="P13">763<text:span text:style-name="T13">BC</text:span></text:p>
          </table:table-cell>
          <table:table-cell table:style-name="Table6.A2" office:value-type="string">
            <text:p text:style-name="P14">Jonah Preaches in Nineveh</text:p>
          </table:table-cell>
          <table:table-cell table:style-name="Table6.C2" office:value-type="string">
            <text:p text:style-name="P14">(Strong Contextual Placement) It is widely accepted by scholars that Jonah arrived in Nineveh immediately before or during this period. The total darkness of the eclipse, coupled with ongoing revolts and plagues (765-759 BC) recorded in the AEC, would have predisposed the highly superstitious Assyrians to believe Jonah's prophecy: "Yet forty days, and Nineveh shall be overthrown." (Jonah 3:4). This explains the unprecedented and complete repentance of the King and the city (Jonah 3:5-9).</text:p>
          </table:table-cell>
        </table:table-row>
        <table:table-row>
          <table:table-cell table:style-name="Table6.A2" office:value-type="string">
            <text:p text:style-name="P13">612<text:span text:style-name="T13">BC</text:span></text:p>
          </table:table-cell>
          <table:table-cell table:style-name="Table6.A2" office:value-type="string">
            <text:p text:style-name="P14">Destruction of Nineveh</text:p>
          </table:table-cell>
          <table:table-cell table:style-name="Table6.C2" office:value-type="string">
            <text:p text:style-name="P14">(Confirmation of Timing) The city was destroyed by a coalition of Babylonians and Medes, roughly 150 years after Jonah's successful mission and confirming that Jonah's warning in the 8th century BC led to a reprieve.</text:p>
          </table:table-cell>
        </table:table-row>
      </table:table>
      <text:p text:style-name="Table_20_Contents"/>
      <text:p text:style-name="Table_20_Contents"/>
      <text:p text:style-name="P15">Amos, who also preached during the reign of Jeroboam II (near the end: Amos 1:1) also potentially referred to solar eclipses <text:span text:style-name="T14">during the day</text:span> twice:</text:p>
      <text:p text:style-name="P15"/>
      <text:p text:style-name="P16"><draw:frame draw:style-name="fr1" draw:name="Image2" text:anchor-type="as-char" svg:width="6.0972in" svg:height="4.0063in" draw:z-index="1"><draw:image xlink:href="Pictures/100000010000043D000002C9AB4AFFFB.png" xlink:type="simple" xlink:show="embed" xlink:actuate="onLoad" draw:mime-type="image/png"/></draw:frame></text:p>
      <text:p text:style-name="P15"/>
      <table:table table:name="Table7" table:style-name="Table7">
        <table:table-column table:style-name="Table7.A"/>
        <text:soft-page-break/>
        <table:table-row>
          <table:table-cell table:style-name="Table7.A1" office:value-type="string">
            <text:p text:style-name="Table_20_Contents"><text:span text:style-name="T15">Amos 5:4-8</text:span><text:line-break/><text:span text:style-name="T16">4</text:span> For thus saith the LORD unto the house of Israel, Seek ye me, and ye shall live: <text:line-break/><text:span text:style-name="T16">5</text:span> But seek not Beth-el, nor enter into Gilgal, and pass not to Beer-sheba: for Gilgal shall surely go into captivity, and Beth-el shall come to nought. <text:line-break/><text:span text:style-name="T16">6</text:span> Seek the LORD, and ye shall live; lest he break out like fire in the house of Joseph, and devour <text:span text:style-name="T8">it</text:span>, and <text:span text:style-name="T8">there be</text:span> none to quench <text:span text:style-name="T8">it</text:span> in Beth-el. <text:line-break/><text:span text:style-name="T16">7</text:span> Ye who turn judgment to wormwood, and leave off righteousness in the earth, <text:line-break/><text:span text:style-name="T16">8</text:span> <text:span text:style-name="T8">Seek him</text:span> that maketh the seven stars and Orion, and turneth the shadow of death into the morning, and <text:span text:style-name="T17">maketh the day dark with night</text:span>: that calleth for the waters of the sea, and poureth them out upon the face of the earth: The LORD <text:span text:style-name="T8">is</text:span> his name:</text:p>
          </table:table-cell>
        </table:table-row>
        <table:table-row>
          <table:table-cell table:style-name="Table7.A2" office:value-type="string">
            <text:p text:style-name="Table_20_Contents"><text:span text:style-name="T15">Amos 8:1-9</text:span><text:line-break/><text:span text:style-name="T16">1</text:span> Thus hath the Lord GOD shewed unto me: and behold a basket of summer fruit. <text:line-break/><text:span text:style-name="T16">2</text:span> And he said, Amos, what seest thou? And I said, A basket of summer fruit. Then said the LORD unto me, The end is come upon my people of Israel; I will not again pass by them any more. <text:line-break/><text:span text:style-name="T16">3</text:span> And the songs of the temple shall be howlings in that day, saith the Lord GOD: <text:span text:style-name="T8">there shall be</text:span> many dead bodies in every place; they shall cast <text:span text:style-name="T8">them</text:span> forth with silence. <text:line-break/><text:span text:style-name="T16">4</text:span> Hear this, O ye that swallow up the needy, even to make the poor of the land to fail, <text:line-break/><text:span text:style-name="T16">5</text:span> Saying, When will the new moon be gone, that we may sell corn? and the sabbath, that we may set forth wheat, making the ephah small, and the shekel great, and falsifying the balances by deceit? <text:line-break/><text:span text:style-name="T16">6</text:span> That we may buy the poor for silver, and the needy for a pair of shoes; <text:span text:style-name="T8">yea</text:span>, and sell the refuse of the wheat? <text:line-break/><text:span text:style-name="T16">7</text:span> The LORD hath sworn by the excellency of Jacob, Surely I will never forget any of their works. <text:line-break/><text:span text:style-name="T16">8</text:span> Shall not the land tremble for this, and every one mourn that dwelleth therein? and it shall rise up wholly as a flood; and it shall be cast out and drowned, as <text:span text:style-name="T8">by</text:span> the flood of Egypt. <text:line-break/><text:span text:style-name="T16">9</text:span> And it shall come to pass in that day, saith the Lord GOD, that <text:span text:style-name="T17">I will cause the sun to go down at noon</text:span>, and <text:span text:style-name="T17">I will darken the earth in the clear day</text:span>:</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4T17:03:20.171094900</meta:creation-date>
    <dc:title>default</dc:title>
    <meta:editing-duration>PT4H58M25S</meta:editing-duration>
    <meta:editing-cycles>46</meta:editing-cycles>
    <meta:generator>LibreOffice/25.8.1.1$Windows_X86_64 LibreOffice_project/54047653041915e595ad4e45cccea684809c77b5</meta:generator>
    <meta:initial-creator>William K. McDannell Jr.</meta:initial-creator>
    <dc:date>2025-10-04T14:07:16.289644700</dc:date>
    <dc:creator>William K. McDannell Jr.</dc:creator>
    <meta:document-statistic meta:table-count="7" meta:image-count="2" meta:object-count="0" meta:page-count="6" meta:paragraph-count="87" meta:word-count="2321" meta:character-count="13766" meta:non-whitespace-character-count="11520"/>
    <meta:template xlink:type="simple" xlink:actuate="onRequest" xlink:title="default" xlink:href="../../../../../AppData/Roaming/LibreOffice/4/user/template/default.ott" meta:date="2025-10-04T17:03:19.217535300"/>
  </office:meta>
</office:document-meta>
</file>