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4.ttf" manifest:media-type="application/x-font-ttf"/>
  <manifest:file-entry manifest:full-path="Fonts/Font_Gabriela_Nerd_Font_1.ttf" manifest:media-type="application/x-font-ttf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Liberation_Sans_2.ttf" manifest:media-type="application/x-font-ttf"/>
  <manifest:file-entry manifest:full-path="Fonts/Font_Lucida_Sans_2.ttf" manifest:media-type="application/x-font-ttf"/>
  <manifest:file-entry manifest:full-path="Fonts/Font_Liberation_Sans_3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officeooo:rsid="002e2637" officeooo:paragraph-rsid="002e2637"/>
    </style:style>
    <style:style style:name="P2" style:family="paragraph" style:parent-style-name="Standard">
      <style:text-properties officeooo:rsid="00338b80" officeooo:paragraph-rsid="00338b80"/>
    </style:style>
    <style:style style:name="P3" style:family="paragraph" style:parent-style-name="Table_20_Contents">
      <style:text-properties fo:color="#127622" loext:opacity="100%" officeooo:rsid="000f327f" officeooo:paragraph-rsid="000f327f"/>
    </style:style>
    <style:style style:name="P4" style:family="paragraph" style:parent-style-name="Table_20_Contents">
      <style:text-properties officeooo:rsid="000f327f" officeooo:paragraph-rsid="000f327f"/>
    </style:style>
    <style:style style:name="P5" style:family="paragraph" style:parent-style-name="Standard" style:list-style-name="L1">
      <style:text-properties officeooo:rsid="0011a931" officeooo:paragraph-rsid="0011a931"/>
    </style:style>
    <style:style style:name="P6" style:family="paragraph" style:parent-style-name="Table_20_Contents">
      <style:text-properties fo:color="#127622" loext:opacity="100%" officeooo:paragraph-rsid="00101fa4"/>
    </style:style>
    <style:style style:name="P7" style:family="paragraph" style:parent-style-name="Table_20_Contents">
      <style:text-properties officeooo:paragraph-rsid="00101fa4"/>
    </style:style>
    <style:style style:name="P8" style:family="paragraph" style:parent-style-name="Table_20_Contents">
      <style:text-properties fo:color="#127622" loext:opacity="100%" officeooo:paragraph-rsid="0010d6aa"/>
    </style:style>
    <style:style style:name="P9" style:family="paragraph" style:parent-style-name="Table_20_Contents">
      <style:text-properties officeooo:paragraph-rsid="0010d6aa"/>
    </style:style>
    <style:style style:name="P10" style:family="paragraph" style:parent-style-name="Standard" style:list-style-name="L2">
      <style:text-properties officeooo:rsid="0011ec23" officeooo:paragraph-rsid="0011ec23"/>
    </style:style>
    <style:style style:name="P11" style:family="paragraph" style:parent-style-name="Standard" style:list-style-name="L2">
      <style:text-properties officeooo:rsid="0011ec23" officeooo:paragraph-rsid="00386501"/>
    </style:style>
    <style:style style:name="P12" style:family="paragraph" style:parent-style-name="Standard" style:list-style-name="L2">
      <style:text-properties officeooo:rsid="00386501" officeooo:paragraph-rsid="00386501"/>
    </style:style>
    <style:style style:name="P13" style:family="paragraph" style:parent-style-name="Standard">
      <style:text-properties officeooo:rsid="0011ec23" officeooo:paragraph-rsid="0011ec23"/>
    </style:style>
    <style:style style:name="P14" style:family="paragraph" style:parent-style-name="Table_20_Contents">
      <style:text-properties fo:color="#127622" loext:opacity="100%" officeooo:paragraph-rsid="001283ea"/>
    </style:style>
    <style:style style:name="P15" style:family="paragraph" style:parent-style-name="Table_20_Contents">
      <style:text-properties officeooo:paragraph-rsid="001283ea"/>
    </style:style>
    <style:style style:name="P16" style:family="paragraph" style:parent-style-name="Standard" style:list-style-name="L3">
      <style:text-properties officeooo:rsid="00157703" officeooo:paragraph-rsid="00157703"/>
    </style:style>
    <style:style style:name="P17" style:family="paragraph" style:parent-style-name="Standard">
      <style:text-properties officeooo:rsid="001283ea" officeooo:paragraph-rsid="001283ea"/>
    </style:style>
    <style:style style:name="P18" style:family="paragraph" style:parent-style-name="Standard">
      <style:text-properties officeooo:rsid="0013be70" officeooo:paragraph-rsid="003ef864"/>
    </style:style>
    <style:style style:name="P19" style:family="paragraph" style:parent-style-name="Standard">
      <style:text-properties officeooo:rsid="0013be70" officeooo:paragraph-rsid="002151af"/>
    </style:style>
    <style:style style:name="P20" style:family="paragraph" style:parent-style-name="Standard">
      <style:text-properties officeooo:rsid="0013be70" officeooo:paragraph-rsid="0013be70"/>
    </style:style>
    <style:style style:name="P21" style:family="paragraph" style:parent-style-name="Standard">
      <style:text-properties officeooo:rsid="002a5371" officeooo:paragraph-rsid="002a5371"/>
    </style:style>
    <style:style style:name="P22" style:family="paragraph" style:parent-style-name="Standard">
      <style:text-properties officeooo:rsid="001cad47" officeooo:paragraph-rsid="001cad47"/>
    </style:style>
    <style:style style:name="P23" style:family="paragraph" style:parent-style-name="Standard">
      <style:text-properties officeooo:rsid="002af44d" officeooo:paragraph-rsid="002af44d"/>
    </style:style>
    <style:style style:name="P24" style:family="paragraph" style:parent-style-name="Standard">
      <style:text-properties officeooo:rsid="00265636" officeooo:paragraph-rsid="00265636"/>
    </style:style>
    <style:style style:name="P25" style:family="paragraph" style:parent-style-name="Standard">
      <style:text-properties officeooo:rsid="003f6b74" officeooo:paragraph-rsid="003f6b74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officeooo:rsid="00383650"/>
    </style:style>
    <style:style style:name="T4" style:family="text">
      <style:text-properties style:text-position="super 58%"/>
    </style:style>
    <style:style style:name="T5" style:family="text">
      <style:text-properties officeooo:rsid="00178632"/>
    </style:style>
    <style:style style:name="T6" style:family="text">
      <style:text-properties officeooo:rsid="00416248"/>
    </style:style>
    <style:style style:name="T7" style:family="text">
      <style:text-properties officeooo:rsid="001908be"/>
    </style:style>
    <style:style style:name="T8" style:family="text">
      <style:text-properties officeooo:rsid="003a33f5"/>
    </style:style>
    <style:style style:name="T9" style:family="text">
      <style:text-properties officeooo:rsid="00191b51"/>
    </style:style>
    <style:style style:name="T10" style:family="text">
      <style:text-properties officeooo:rsid="003bd8cb"/>
    </style:style>
    <style:style style:name="T11" style:family="text">
      <style:text-properties officeooo:rsid="003d26ea"/>
    </style:style>
    <style:style style:name="T12" style:family="text">
      <style:text-properties officeooo:rsid="003ef864"/>
    </style:style>
    <style:style style:name="T13" style:family="text">
      <style:text-properties officeooo:rsid="002930f6"/>
    </style:style>
    <style:style style:name="T14" style:family="text">
      <style:text-properties officeooo:rsid="00283daa"/>
    </style:style>
    <style:style style:name="T15" style:family="text">
      <style:text-properties fo:color="#127622" loext:opacity="100%" officeooo:rsid="00416248"/>
    </style:style>
    <style:style style:name="T16" style:family="text">
      <style:text-properties fo:color="#127622" loext:opacity="100%" officeooo:rsid="00425c5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b1b61"/>
    </style:style>
    <style:style style:name="T19" style:family="text">
      <style:text-properties fo:font-style="italic" officeooo:rsid="002b1b61" style:font-style-asian="italic" style:font-style-complex="italic"/>
    </style:style>
    <style:style style:name="T20" style:family="text">
      <style:text-properties officeooo:rsid="002b07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old was Noah when Shem was born?</text:p>
      <text:p text:style-name="Standard"/>
      <text:p text:style-name="Standard"/>
      <text:p text:style-name="P2">At first glance of <text:span text:style-name="T1">Genesis 5:32</text:span>, this might seem like a simple question to answer. But, if you don’t look carefully at the rest of scripture you can easily make a mistake.</text:p>
      <text:p text:style-name="P2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Genesis 5:32</text:p>
            <text:p text:style-name="P4">And Noah was <text:span text:style-name="T2">five hundred years old</text:span>: and Noah begat Shem, Ham, and Japheth.</text:p>
          </table:table-cell>
        </table:table-row>
      </table:table>
      <text:list text:style-name="L1">
        <text:list-item>
          <text:p text:style-name="P5">Let’s assume for a moment that Noah <text:span text:style-name="T3">w</text:span>as 500 when Shem was born.</text:p>
        </text:list-item>
      </text:list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Genesis 7:6</text:p>
            <text:p text:style-name="P7">And Noah was <text:span text:style-name="T2">six hundred years old</text:span> when the flood of waters was upon the earth.</text:p>
            <text:p text:style-name="Table_20_Contents"/>
            <text:p text:style-name="P8">Genesis 7:11</text:p>
            <text:p text:style-name="P9">¶ In the <text:span text:style-name="T2">six hundredth year of Noah's life</text:span>, in the second month, the seventeenth day of the month, the same day were all the fountains of the great deep broken up, and the windows of heaven were opened.</text:p>
          </table:table-cell>
        </table:table-row>
      </table:table>
      <text:list text:style-name="L2">
        <text:list-item>
          <text:p text:style-name="P10">The flood came in the 600<text:span text:style-name="T4">th</text:span> year of Noah’s life.</text:p>
        </text:list-item>
        <text:list-item>
          <text:p text:style-name="P11">Based on our previous assumption that would make Shem 100 years old when the flood came</text:p>
          <text:list>
            <text:list-item>
              <text:p text:style-name="P12">500 + 100 = 600</text:p>
            </text:list-item>
          </text:list>
        </text:list-item>
      </text:list>
      <text:p text:style-name="P13"/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Genesis 11:10</text:p>
            <text:p text:style-name="P15">¶ These are the generations of Shem: <text:span text:style-name="T2">Shem was an hundred years old</text:span>, and begat Arphaxad <text:span text:style-name="T2">two years after the flood</text:span>:</text:p>
          </table:table-cell>
        </table:table-row>
      </table:table>
      <text:list text:style-name="L3">
        <text:list-item>
          <text:p text:style-name="P16"><text:span text:style-name="T5">Let’s </text:span><text:span text:style-name="T6">also </text:span><text:span text:style-name="T5">assume </text:span><text:span text:style-name="T7">from this verse </text:span><text:span text:style-name="T5">that </text:span>Shem was 100 years old when he begat Arphaxad and that was also <text:span text:style-name="T8">2</text:span> years after the flood.</text:p>
        </text:list-item>
      </text:list>
      <text:p text:style-name="P17"/>
      <text:p text:style-name="P17"/>
      <text:p text:style-name="P18">But, <text:span text:style-name="T9">wait. </text:span><text:span text:style-name="T10">If the flood came when Shem was 100 years old </text:span><text:span text:style-name="T11">that would make him</text:span><text:span text:style-name="T10"> 102 years old 2 years after the flood </text:span><text:span text:style-name="T12">not 100 years old. So, w</text:span><text:span text:style-name="T13">e</text:span><text:span text:style-name="T14"> made a mistake somewhere. </text:span><text:span text:style-name="T6">And that mistake was in our interpretation of either </text:span><text:span text:style-name="T15">Genes</text:span><text:span text:style-name="T16">is</text:span><text:span text:style-name="T15"> 5:32</text:span><text:span text:style-name="T6"> and </text:span><text:span text:style-name="T15">Genesis 11:10</text:span><text:span text:style-name="T6"> because both of those assumptions cannot be true at the same time.</text:span></text:p>
      <text:p text:style-name="P19"/>
      <text:p text:style-name="P20"/>
      <text:p text:style-name="P21"><text:span text:style-name="T17">Assuming our mistake was in how we read Genesis 5:32</text:span>:</text:p>
      <text:p text:style-name="P22"><text:tab/><text:span text:style-name="T18">Noah was 500 when he </text:span><text:span text:style-name="T19">began</text:span><text:span text:style-name="T18"> to begat Shem, Ham, and Japheth. </text:span>Noah was 502 when he begat Shem. <text:span text:style-name="T20">That would make Shem 102 years old 2 years after the flood.</text:span></text:p>
      <text:p text:style-name="P22"/>
      <text:p text:style-name="P23"><text:span text:style-name="T17">Assuming our mistake was in how we read Genesis 11:10</text:span>:</text:p>
      <text:p text:style-name="P24"><text:tab/>Shem was 100 years old. When Shem was 102 years old he begat Arphaxad which was also 2 years after the flood.</text:p>
      <text:p text:style-name="P24"/>
      <text:p text:style-name="P25">Because of the comma in <text:span text:style-name="T1">Genesis 11:10</text:span> I lean more towards Shem was 100 years old when he begat Arphaxad and that also was 2 years after the flood. Which would mean that Noah was 502 years old when Shem was bor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4:56:27.238676100</meta:creation-date>
    <dc:title>How old was Noah when Shem was born</dc:title>
    <meta:editing-duration>PT55M12S</meta:editing-duration>
    <meta:editing-cycles>48</meta:editing-cycles>
    <meta:generator>LibreOffice/25.2.5.2$Windows_X86_64 LibreOffice_project/03d19516eb2e1dd5d4ccd751a0d6f35f35e08022</meta:generator>
    <dc:date>2025-08-23T16:02:43.225797800</dc:date>
    <meta:document-statistic meta:table-count="3" meta:image-count="0" meta:object-count="0" meta:page-count="1" meta:paragraph-count="21" meta:word-count="387" meta:character-count="1967" meta:non-whitespace-character-count="1604"/>
    <meta:template xlink:type="simple" xlink:actuate="onRequest" xlink:title="default" xlink:href="../../../../AppData/Roaming/LibreOffice/4/user/template/default.ott" meta:date="2025-08-23T14:56:26.568095200"/>
  </office:meta>
</office:document-meta>
</file>