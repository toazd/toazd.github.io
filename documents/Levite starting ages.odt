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1" style:family="text">
      <style:text-properties fo:color="#127622" loext:opacity="100%"/>
    </style:style>
    <style:style style:name="T2" style:family="text">
      <style:text-properties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Numbers 4:3</text:span><text:line-break/>From <text:span text:style-name="T2">thirty years old and upward even until fifty years old</text:span>, all that enter into the host, <text:span text:style-name="T2">to do the work in the tabernacle</text:span> of the congregation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Numbers 4:23</text:span><text:line-break/>From <text:span text:style-name="T2">thirty years old and upward until fifty years old</text:span> shalt thou number them; <text:span text:style-name="T2">all that enter in to perform the service</text:span>, to do the work in the tabernacle of the congregation.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Numbers 4:30</text:span><text:line-break/>From <text:span text:style-name="T2">thirty years old and upward even unto fifty years old</text:span> shalt thou number them, <text:span text:style-name="T2">every one that entereth into the service</text:span>, <text:span text:style-name="T2">to do the work of the tabernacle</text:span> of the congregation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Numbers 8:24-25</text:span><text:line-break/>24 This is it that belonging unto the Levites: from <text:span text:style-name="T2">twenty and five years old</text:span> and upward they shall go in <text:span text:style-name="T2">to wait upon the service of the tabernacle</text:span> of the congregation:<text:line-break/>25 And from the age of <text:span text:style-name="T2">fifty years they shall cease</text:span> waiting upon the service thereof, and shall serve no more: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1 Chronicles 23:24-28</text:span><text:line-break/>24 These were the <text:span text:style-name="T2">sons of Levi</text:span> after the house of their fathers; even the chief of the fathers, as they were counted by number of names by their polls, <text:span text:style-name="T2">that did the work for the service</text:span> of the house of the LORD, from the age of <text:span text:style-name="T2">twenty years and upward</text:span>.<text:line-break/>25 For David said, The LORD God of Israel hath given rest unto his people, that they may dwell in Jerusalem for ever:<text:line-break/>26 And also unto the Levites; they shall no more carry the tabernacle, nor any vessels of it for the service thereof.<text:line-break/>27 For by the last words of David the Levites were numbered from twenty years old and above:<text:line-break/>28 Because <text:span text:style-name="T2">their office was to wait on the sons of Aaron for the service of the house of the LORD</text:span>, in the courts, and in the chambers, and in the purifying of all holy things, and the work of the service of the house of Go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1:13:08.460436200</meta:creation-date>
    <dc:title>default</dc:title>
    <meta:editing-duration>PT5M58S</meta:editing-duration>
    <meta:editing-cycles>5</meta:editing-cycles>
    <meta:generator>LibreOffice/26.2.4.2$Linux_X86_64 LibreOffice_project/64a984c51f4702dbd3710b13428c673a2f1292e7</meta:generator>
    <dc:date>2026-07-11T12:20:14.344663405</dc:date>
    <meta:document-statistic meta:table-count="5" meta:image-count="0" meta:object-count="0" meta:page-count="1" meta:paragraph-count="5" meta:word-count="316" meta:character-count="1658" meta:non-whitespace-character-count="1347"/>
    <meta:template xlink:type="simple" xlink:actuate="onRequest" xlink:title="default" xlink:href="../../../../AppData/Roaming/LibreOffice/4/user/template/default.ott" meta:date="2026-01-21T11:13:08.139435900"/>
  </office:meta>
</office:document-meta>
</file>