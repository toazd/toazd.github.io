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1.975in" style:rel-column-width="16383*"/>
    </style:style>
    <style:style style:name="Table3.D" style:family="table-column">
      <style:table-column-properties style:column-width="1.975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6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fo:padding="0.0382in" fo:border-left="0.5pt solid #000000" fo:border-right="none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fo:padding="0.0382in" fo:border-left="0.5pt solid #000000" fo:border-right="none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fo:padding="0.0382in" fo:border-left="0.5pt solid #000000" fo:border-right="none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fo:padding="0.0382in" fo:border-left="0.5pt solid #000000" fo:border-right="none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fo:padding="0.0382in" fo:border-left="0.5pt solid #000000" fo:border-right="none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fo:padding="0.0382in" fo:border-left="0.5pt solid #000000" fo:border-right="none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fo:padding="0.0382in" fo:border-left="0.5pt solid #000000" fo:border-right="none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fo:padding="0.0382in" fo:border-left="0.5pt solid #000000" fo:border-right="none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fo:padding="0.0382in" fo:border-left="0.5pt solid #000000" fo:border-right="none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fo:padding="0.0382in" fo:border-left="0.5pt solid #000000" fo:border-right="none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fo:padding="0.0382in" fo:border-left="0.5pt solid #000000" fo:border-right="none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officeooo:rsid="00abe21b" officeooo:paragraph-rsid="00abe21b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aa22ef" officeooo:paragraph-rsid="00aa22ef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127622" loext:opacity="100%" officeooo:rsid="00140400" officeooo:paragraph-rsid="00aa22ef"/>
    </style:style>
    <style:style style:name="P4" style:family="paragraph" style:parent-style-name="Table_20_Contents">
      <style:paragraph-properties fo:text-align="center" style:justify-single-word="false"/>
      <style:text-properties officeooo:rsid="00aa22ef" officeooo:paragraph-rsid="00aa22ef"/>
    </style:style>
    <style:style style:name="P5" style:family="paragraph" style:parent-style-name="Table_20_Contents">
      <style:paragraph-properties fo:text-align="center" style:justify-single-word="false"/>
      <style:text-properties officeooo:rsid="00aa22ef"/>
    </style:style>
    <style:style style:name="P6" style:family="paragraph" style:parent-style-name="Table_20_Contents">
      <style:text-properties officeooo:rsid="00140400" officeooo:paragraph-rsid="00aa22ef"/>
    </style:style>
    <style:style style:name="P7" style:family="paragraph" style:parent-style-name="Table_20_Contents">
      <style:paragraph-properties fo:text-align="center" style:justify-single-word="false"/>
      <style:text-properties officeooo:rsid="00ab1c9e" officeooo:paragraph-rsid="00aa22ef"/>
    </style:style>
    <style:style style:name="P8" style:family="paragraph" style:parent-style-name="Table_20_Contents">
      <style:text-properties officeooo:rsid="00140400" officeooo:paragraph-rsid="0012dc30"/>
    </style:style>
    <style:style style:name="P9" style:family="paragraph" style:parent-style-name="Table_20_Contents">
      <style:text-properties officeooo:rsid="003b19a1" officeooo:paragraph-rsid="003b19a1"/>
    </style:style>
    <style:style style:name="P10" style:family="paragraph" style:parent-style-name="Table_20_Contents">
      <style:text-properties officeooo:paragraph-rsid="00958e55"/>
    </style:style>
    <style:style style:name="P11" style:family="paragraph" style:parent-style-name="Table_20_Contents">
      <style:text-properties officeooo:rsid="0016e0fc" officeooo:paragraph-rsid="00958e55"/>
    </style:style>
    <style:style style:name="P12" style:family="paragraph" style:parent-style-name="Table_20_Contents">
      <style:text-properties officeooo:rsid="0113c0fa" officeooo:paragraph-rsid="0113c0fa"/>
    </style:style>
    <style:style style:name="P13" style:family="paragraph" style:parent-style-name="Table_20_Contents">
      <style:text-properties officeooo:rsid="0016e0fc" officeooo:paragraph-rsid="00ccc9fe"/>
    </style:style>
    <style:style style:name="P14" style:family="paragraph" style:parent-style-name="Table_20_Contents">
      <style:text-properties officeooo:rsid="0016e0fc" officeooo:paragraph-rsid="0094ba34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73400" officeooo:paragraph-rsid="00273400" style:font-weight-asian="bold" style:font-weight-complex="bold"/>
    </style:style>
    <style:style style:name="P16" style:family="paragraph" style:parent-style-name="Table_20_Contents">
      <style:text-properties fo:color="#127622" loext:opacity="100%" officeooo:rsid="0027aec4" officeooo:paragraph-rsid="007fa0d7"/>
    </style:style>
    <style:style style:name="P17" style:family="paragraph" style:parent-style-name="Table_20_Contents">
      <style:text-properties officeooo:rsid="0027aec4" officeooo:paragraph-rsid="0027aec4"/>
    </style:style>
    <style:style style:name="P18" style:family="paragraph" style:parent-style-name="Table_20_Contents">
      <style:text-properties officeooo:rsid="002aece8" officeooo:paragraph-rsid="002bb402"/>
    </style:style>
    <style:style style:name="P19" style:family="paragraph" style:parent-style-name="Table_20_Contents" style:list-style-name="L1">
      <style:text-properties officeooo:rsid="002d99e9" officeooo:paragraph-rsid="002d99e9"/>
    </style:style>
    <style:style style:name="P20" style:family="paragraph" style:parent-style-name="Table_20_Contents" style:list-style-name="L1">
      <style:text-properties officeooo:rsid="002aece8" officeooo:paragraph-rsid="002d99e9"/>
    </style:style>
    <style:style style:name="P21" style:family="paragraph" style:parent-style-name="Table_20_Contents">
      <style:paragraph-properties fo:text-align="left" style:justify-single-word="false"/>
      <style:text-properties officeooo:paragraph-rsid="00309b2d"/>
    </style:style>
    <style:style style:name="P22" style:family="paragraph" style:parent-style-name="Table_20_Contents" style:list-style-name="L2">
      <style:text-properties officeooo:rsid="001aff63" officeooo:paragraph-rsid="0027aec4"/>
    </style:style>
    <style:style style:name="P23" style:family="paragraph" style:parent-style-name="Table_20_Contents" style:list-style-name="L2">
      <style:text-properties officeooo:rsid="001d13d4" officeooo:paragraph-rsid="0027aec4"/>
    </style:style>
    <style:style style:name="P24" style:family="paragraph" style:parent-style-name="Table_20_Contents">
      <style:text-properties officeooo:paragraph-rsid="007fc5f8"/>
    </style:style>
    <style:style style:name="P25" style:family="paragraph" style:parent-style-name="Table_20_Contents">
      <style:text-properties fo:color="#127622" loext:opacity="100%" officeooo:rsid="002aece8" officeooo:paragraph-rsid="002aece8"/>
    </style:style>
    <style:style style:name="P26" style:family="paragraph" style:parent-style-name="Table_20_Contents">
      <style:text-properties officeooo:rsid="002aece8" officeooo:paragraph-rsid="002aece8"/>
    </style:style>
    <style:style style:name="P27" style:family="paragraph" style:parent-style-name="Table_20_Contents" style:list-style-name="L3">
      <style:text-properties officeooo:rsid="002aece8" officeooo:paragraph-rsid="002aece8"/>
    </style:style>
    <style:style style:name="P28" style:family="paragraph" style:parent-style-name="Table_20_Contents">
      <style:text-properties officeooo:rsid="00309b2d" officeooo:paragraph-rsid="00309b2d"/>
    </style:style>
    <style:style style:name="P29" style:family="paragraph" style:parent-style-name="Table_20_Contents">
      <style:text-properties fo:color="#127622" loext:opacity="100%" officeooo:rsid="00309b2d" officeooo:paragraph-rsid="00309b2d"/>
    </style:style>
    <style:style style:name="P30" style:family="paragraph" style:parent-style-name="Table_20_Contents">
      <style:text-properties officeooo:rsid="0030b1ac" officeooo:paragraph-rsid="007f4e70"/>
    </style:style>
    <style:style style:name="P31" style:family="paragraph" style:parent-style-name="Table_20_Contents">
      <style:text-properties fo:color="#127622" loext:opacity="100%" officeooo:rsid="0030b1ac" officeooo:paragraph-rsid="0030b1ac"/>
    </style:style>
    <style:style style:name="P32" style:family="paragraph" style:parent-style-name="Table_20_Contents">
      <style:text-properties officeooo:rsid="003706fd" officeooo:paragraph-rsid="003706fd"/>
    </style:style>
    <style:style style:name="P33" style:family="paragraph" style:parent-style-name="Table_20_Contents">
      <style:text-properties fo:color="#127622" loext:opacity="100%" officeooo:rsid="003706fd" officeooo:paragraph-rsid="003706fd"/>
    </style:style>
    <style:style style:name="P34" style:family="paragraph" style:parent-style-name="Table_20_Contents">
      <style:text-properties officeooo:rsid="0038a89a" officeooo:paragraph-rsid="0038a89a"/>
    </style:style>
    <style:style style:name="P35" style:family="paragraph" style:parent-style-name="Table_20_Contents">
      <style:text-properties fo:color="#127622" loext:opacity="100%" officeooo:rsid="0038a89a" officeooo:paragraph-rsid="0038a89a"/>
    </style:style>
    <style:style style:name="P36" style:family="paragraph" style:parent-style-name="Table_20_Contents">
      <style:text-properties officeooo:rsid="00459683" officeooo:paragraph-rsid="007da8cc"/>
    </style:style>
    <style:style style:name="P37" style:family="paragraph" style:parent-style-name="Table_20_Contents">
      <style:text-properties fo:color="#127622" loext:opacity="100%" officeooo:rsid="00459683" officeooo:paragraph-rsid="00459683"/>
    </style:style>
    <style:style style:name="P38" style:family="paragraph" style:parent-style-name="Table_20_Contents">
      <style:text-properties officeooo:rsid="0046f305" officeooo:paragraph-rsid="0046f305"/>
    </style:style>
    <style:style style:name="P39" style:family="paragraph" style:parent-style-name="Table_20_Contents">
      <style:text-properties fo:color="#127622" loext:opacity="100%" officeooo:rsid="0046f305" officeooo:paragraph-rsid="0046f305"/>
    </style:style>
    <style:style style:name="P40" style:family="paragraph" style:parent-style-name="Table_20_Contents">
      <style:text-properties officeooo:rsid="0046f305" officeooo:paragraph-rsid="007da8cc"/>
    </style:style>
    <style:style style:name="P41" style:family="paragraph" style:parent-style-name="Table_20_Contents">
      <style:text-properties officeooo:paragraph-rsid="00d42060"/>
    </style:style>
    <style:style style:name="P42" style:family="paragraph" style:parent-style-name="Table_20_Contents">
      <style:text-properties fo:color="#127622" loext:opacity="100%" officeooo:rsid="004c27d4" officeooo:paragraph-rsid="004c27d4"/>
    </style:style>
    <style:style style:name="P43" style:family="paragraph" style:parent-style-name="Table_20_Contents">
      <style:text-properties officeooo:rsid="004c27d4" officeooo:paragraph-rsid="00d42060"/>
    </style:style>
    <style:style style:name="P44" style:family="paragraph" style:parent-style-name="Table_20_Contents">
      <style:text-properties officeooo:rsid="004cb1f9" officeooo:paragraph-rsid="004cb1f9"/>
    </style:style>
    <style:style style:name="P45" style:family="paragraph" style:parent-style-name="Table_20_Contents">
      <style:text-properties fo:color="#127622" loext:opacity="100%" officeooo:rsid="004cb1f9" officeooo:paragraph-rsid="004cb1f9"/>
    </style:style>
    <style:style style:name="P46" style:family="paragraph" style:parent-style-name="Table_20_Contents">
      <style:text-properties officeooo:rsid="004dd2f6" officeooo:paragraph-rsid="005314ef"/>
    </style:style>
    <style:style style:name="P47" style:family="paragraph" style:parent-style-name="Table_20_Contents">
      <style:text-properties fo:color="#127622" loext:opacity="100%" officeooo:rsid="005314ef" officeooo:paragraph-rsid="005314ef"/>
    </style:style>
    <style:style style:name="P48" style:family="paragraph" style:parent-style-name="Table_20_Contents">
      <style:text-properties officeooo:rsid="004f24ed" officeooo:paragraph-rsid="005314ef"/>
    </style:style>
    <style:style style:name="P49" style:family="paragraph" style:parent-style-name="Table_20_Contents" style:list-style-name="L4">
      <style:text-properties officeooo:rsid="004f24ed" officeooo:paragraph-rsid="005b35c7"/>
    </style:style>
    <style:style style:name="P50" style:family="paragraph" style:parent-style-name="Table_20_Contents" style:list-style-name="L5">
      <style:text-properties officeooo:paragraph-rsid="005b35c7"/>
    </style:style>
    <style:style style:name="P51" style:family="paragraph" style:parent-style-name="Table_20_Contents" style:list-style-name="L4">
      <style:text-properties officeooo:rsid="004f24ed" officeooo:paragraph-rsid="004f24ed"/>
    </style:style>
    <style:style style:name="P52" style:family="paragraph" style:parent-style-name="Table_20_Contents" style:list-style-name="L6">
      <style:text-properties officeooo:rsid="005b35c7" officeooo:paragraph-rsid="005b35c7"/>
    </style:style>
    <style:style style:name="P53" style:family="paragraph" style:parent-style-name="Table_20_Contents">
      <style:text-properties officeooo:rsid="0055159c" officeooo:paragraph-rsid="0055159c"/>
    </style:style>
    <style:style style:name="P54" style:family="paragraph" style:parent-style-name="Table_20_Contents">
      <style:text-properties fo:color="#127622" loext:opacity="100%" officeooo:rsid="0056e8cb" officeooo:paragraph-rsid="0056e8cb"/>
    </style:style>
    <style:style style:name="P55" style:family="paragraph" style:parent-style-name="Table_20_Contents">
      <style:text-properties officeooo:rsid="0056e8cb" officeooo:paragraph-rsid="0056e8cb"/>
    </style:style>
    <style:style style:name="P56" style:family="paragraph" style:parent-style-name="Table_20_Contents">
      <style:text-properties officeooo:rsid="00541899" officeooo:paragraph-rsid="00541899"/>
    </style:style>
    <style:style style:name="P57" style:family="paragraph" style:parent-style-name="Table_20_Contents">
      <style:text-properties fo:color="#127622" loext:opacity="100%" officeooo:rsid="00541899"/>
    </style:style>
    <style:style style:name="P58" style:family="paragraph" style:parent-style-name="Table_20_Contents">
      <style:text-properties officeooo:rsid="00f341d2" officeooo:paragraph-rsid="00f341d2"/>
    </style:style>
    <style:style style:name="P59" style:family="paragraph" style:parent-style-name="Table_20_Contents" style:list-style-name="L7">
      <style:text-properties officeooo:rsid="00f6673a" officeooo:paragraph-rsid="00f6673a"/>
    </style:style>
    <style:style style:name="P60" style:family="paragraph" style:parent-style-name="Table_20_Contents" style:list-style-name="L7">
      <style:text-properties officeooo:rsid="002aece8" officeooo:paragraph-rsid="00f6673a"/>
    </style:style>
    <style:style style:name="P61" style:family="paragraph" style:parent-style-name="Table_20_Contents" style:list-style-name="L7">
      <style:text-properties officeooo:rsid="00f7a27b" officeooo:paragraph-rsid="00f7a27b"/>
    </style:style>
    <style:style style:name="P62" style:family="paragraph" style:parent-style-name="Table_20_Contents">
      <style:text-properties officeooo:rsid="0064b6a6" officeooo:paragraph-rsid="0064b6a6"/>
    </style:style>
    <style:style style:name="P63" style:family="paragraph" style:parent-style-name="Table_20_Contents">
      <style:text-properties fo:color="#127622" loext:opacity="100%" officeooo:rsid="0064d07b" officeooo:paragraph-rsid="0064d07b"/>
    </style:style>
    <style:style style:name="P64" style:family="paragraph" style:parent-style-name="Table_20_Contents">
      <style:text-properties officeooo:rsid="0065a701" officeooo:paragraph-rsid="0065a701"/>
    </style:style>
    <style:style style:name="P65" style:family="paragraph" style:parent-style-name="Table_20_Contents">
      <style:text-properties fo:color="#127622" loext:opacity="100%" officeooo:rsid="0065a701" officeooo:paragraph-rsid="0065a701"/>
    </style:style>
    <style:style style:name="P66" style:family="paragraph" style:parent-style-name="Table_20_Contents">
      <style:text-properties officeooo:rsid="0065a701" officeooo:paragraph-rsid="007bfed5"/>
    </style:style>
    <style:style style:name="P67" style:family="paragraph" style:parent-style-name="Table_20_Contents">
      <style:text-properties fo:color="#127622" loext:opacity="100%" officeooo:rsid="00669d4b" officeooo:paragraph-rsid="00669d4b"/>
    </style:style>
    <style:style style:name="P68" style:family="paragraph" style:parent-style-name="Table_20_Contents">
      <style:text-properties officeooo:rsid="00669d4b" officeooo:paragraph-rsid="00669d4b"/>
    </style:style>
    <style:style style:name="P69" style:family="paragraph" style:parent-style-name="Table_20_Contents">
      <style:text-properties fo:color="#127622" loext:opacity="100%" officeooo:rsid="006702d7" officeooo:paragraph-rsid="006702d7"/>
    </style:style>
    <style:style style:name="P70" style:family="paragraph" style:parent-style-name="Table_20_Contents">
      <style:text-properties officeooo:rsid="006a0d72" officeooo:paragraph-rsid="006a0d72"/>
    </style:style>
    <style:style style:name="P71" style:family="paragraph" style:parent-style-name="Table_20_Contents">
      <style:text-properties fo:color="#127622" loext:opacity="100%" officeooo:rsid="006a0d72"/>
    </style:style>
    <style:style style:name="P72" style:family="paragraph" style:parent-style-name="Table_20_Contents">
      <style:text-properties officeooo:rsid="006b8f50" officeooo:paragraph-rsid="006b8f50"/>
    </style:style>
    <style:style style:name="P73" style:family="paragraph" style:parent-style-name="Table_20_Contents">
      <style:text-properties officeooo:rsid="006ebd30" officeooo:paragraph-rsid="006ebd30"/>
    </style:style>
    <style:style style:name="P74" style:family="paragraph" style:parent-style-name="Table_20_Contents">
      <style:text-properties fo:color="#127622" loext:opacity="100%" officeooo:rsid="00706851" officeooo:paragraph-rsid="00706851"/>
    </style:style>
    <style:style style:name="P75" style:family="paragraph" style:parent-style-name="Table_20_Contents">
      <style:text-properties officeooo:rsid="007083ea" officeooo:paragraph-rsid="007c732c"/>
    </style:style>
    <style:style style:name="P76" style:family="paragraph" style:parent-style-name="Table_20_Contents">
      <style:text-properties fo:color="#127622" loext:opacity="100%" officeooo:rsid="0071d232" officeooo:paragraph-rsid="0071d232"/>
    </style:style>
    <style:style style:name="P77" style:family="paragraph" style:parent-style-name="Table_20_Contents">
      <style:text-properties officeooo:rsid="0117ac7d" officeooo:paragraph-rsid="0117ac7d"/>
    </style:style>
    <style:style style:name="P78" style:family="paragraph" style:parent-style-name="Table_20_Contents">
      <style:text-properties fo:color="#127622" loext:opacity="100%" officeooo:rsid="0117ac7d"/>
    </style:style>
    <style:style style:name="P79" style:family="paragraph" style:parent-style-name="Table_20_Contents">
      <style:text-properties officeooo:rsid="0119bcbe" officeooo:paragraph-rsid="0119bcbe"/>
    </style:style>
    <style:style style:name="P80" style:family="paragraph" style:parent-style-name="Table_20_Contents">
      <style:text-properties officeooo:rsid="007477ca" officeooo:paragraph-rsid="007477ca"/>
    </style:style>
    <style:style style:name="P81" style:family="paragraph" style:parent-style-name="Table_20_Contents">
      <style:text-properties fo:color="#127622" loext:opacity="100%" officeooo:rsid="0075dcfc" officeooo:paragraph-rsid="0075dcfc"/>
    </style:style>
    <style:style style:name="P82" style:family="paragraph" style:parent-style-name="Table_20_Contents">
      <style:text-properties officeooo:rsid="0075dcfc" officeooo:paragraph-rsid="0081cc81"/>
    </style:style>
    <style:style style:name="P83" style:family="paragraph" style:parent-style-name="Table_20_Contents">
      <style:text-properties officeooo:rsid="00fc737f" officeooo:paragraph-rsid="00fc737f"/>
    </style:style>
    <style:style style:name="P84" style:family="paragraph" style:parent-style-name="Table_20_Contents" style:list-style-name="L8">
      <style:text-properties officeooo:rsid="00fc737f" officeooo:paragraph-rsid="00fc737f"/>
    </style:style>
    <style:style style:name="P85" style:family="paragraph" style:parent-style-name="Table_20_Contents">
      <style:text-properties officeooo:rsid="00d215e3" officeooo:paragraph-rsid="00d3bfcf"/>
    </style:style>
    <style:style style:name="P86" style:family="paragraph" style:parent-style-name="Table_20_Contents">
      <style:text-properties fo:color="#127622" loext:opacity="100%" officeooo:rsid="00d215e3" officeooo:paragraph-rsid="00d215e3"/>
    </style:style>
    <style:style style:name="P87" style:family="paragraph" style:parent-style-name="Table_20_Contents">
      <style:text-properties officeooo:rsid="0076627e" officeooo:paragraph-rsid="0076627e"/>
    </style:style>
    <style:style style:name="P88" style:family="paragraph" style:parent-style-name="Table_20_Contents">
      <style:text-properties fo:color="#127622" loext:opacity="100%" officeooo:rsid="0076627e"/>
    </style:style>
    <style:style style:name="P89" style:family="paragraph" style:parent-style-name="Table_20_Contents">
      <style:text-properties officeooo:rsid="00dc44f7" officeooo:paragraph-rsid="00dc44f7"/>
    </style:style>
    <style:style style:name="P90" style:family="paragraph" style:parent-style-name="Table_20_Contents">
      <style:text-properties officeooo:rsid="0076627e" officeooo:paragraph-rsid="0081cc81"/>
    </style:style>
    <style:style style:name="P91" style:family="paragraph" style:parent-style-name="Table_20_Contents">
      <style:text-properties officeooo:rsid="00dce344" officeooo:paragraph-rsid="00dce344"/>
    </style:style>
    <style:style style:name="P92" style:family="paragraph" style:parent-style-name="Table_20_Contents">
      <style:text-properties officeooo:rsid="007811ae" officeooo:paragraph-rsid="007811ae"/>
    </style:style>
    <style:style style:name="P93" style:family="paragraph" style:parent-style-name="Table_20_Contents">
      <style:text-properties fo:color="#127622" loext:opacity="100%" officeooo:rsid="007811ae" officeooo:paragraph-rsid="007811ae"/>
    </style:style>
    <style:style style:name="P94" style:family="paragraph" style:parent-style-name="Table_20_Contents">
      <style:text-properties officeooo:rsid="008364b5" officeooo:paragraph-rsid="00e7bd33"/>
    </style:style>
    <style:style style:name="P95" style:family="paragraph" style:parent-style-name="Table_20_Contents">
      <style:text-properties fo:color="#127622" loext:opacity="100%" officeooo:rsid="008364b5" officeooo:paragraph-rsid="008364b5"/>
    </style:style>
    <style:style style:name="P96" style:family="paragraph" style:parent-style-name="Table_20_Contents">
      <style:text-properties fo:color="#127622" loext:opacity="100%" officeooo:rsid="00e7bd33" officeooo:paragraph-rsid="00e7bd33"/>
    </style:style>
    <style:style style:name="P97" style:family="paragraph" style:parent-style-name="Table_20_Contents">
      <style:text-properties officeooo:rsid="011cf8a5" officeooo:paragraph-rsid="011e9d31"/>
    </style:style>
    <style:style style:name="P98" style:family="paragraph" style:parent-style-name="Table_20_Contents">
      <style:text-properties officeooo:rsid="0082fd4b" officeooo:paragraph-rsid="0082fd4b"/>
    </style:style>
    <style:style style:name="P99" style:family="paragraph" style:parent-style-name="Table_20_Contents">
      <style:text-properties fo:color="#127622" loext:opacity="100%" officeooo:rsid="00832aee" officeooo:paragraph-rsid="00832aee"/>
    </style:style>
    <style:style style:name="P100" style:family="paragraph" style:parent-style-name="Table_20_Contents">
      <style:text-properties fo:color="#127622" loext:opacity="100%" officeooo:rsid="00e66ba7" officeooo:paragraph-rsid="00e66ba7"/>
    </style:style>
    <style:style style:name="P101" style:family="paragraph" style:parent-style-name="Table_20_Contents">
      <style:text-properties officeooo:rsid="0085e5f2" officeooo:paragraph-rsid="00848680"/>
    </style:style>
    <style:style style:name="P102" style:family="paragraph" style:parent-style-name="Table_20_Contents">
      <style:text-properties officeooo:rsid="00848680" officeooo:paragraph-rsid="00848680"/>
    </style:style>
    <style:style style:name="P103" style:family="paragraph" style:parent-style-name="Table_20_Contents">
      <style:text-properties fo:color="#127622" loext:opacity="100%" officeooo:rsid="00848680" officeooo:paragraph-rsid="00848680"/>
    </style:style>
    <style:style style:name="P104" style:family="paragraph" style:parent-style-name="Table_20_Contents">
      <style:text-properties officeooo:rsid="00875c6a" officeooo:paragraph-rsid="00884076"/>
    </style:style>
    <style:style style:name="P105" style:family="paragraph" style:parent-style-name="Table_20_Contents">
      <style:text-properties fo:color="#127622" loext:opacity="100%" officeooo:rsid="00875c6a" officeooo:paragraph-rsid="00875c6a"/>
    </style:style>
    <style:style style:name="P106" style:family="paragraph" style:parent-style-name="Table_20_Contents">
      <style:text-properties officeooo:rsid="00875c6a" officeooo:paragraph-rsid="00875c6a"/>
    </style:style>
    <style:style style:name="P107" style:family="paragraph" style:parent-style-name="Table_20_Contents">
      <style:text-properties fo:color="#127622" loext:opacity="100%" officeooo:rsid="00875c6a"/>
    </style:style>
    <style:style style:name="P108" style:family="paragraph" style:parent-style-name="Table_20_Contents">
      <style:text-properties officeooo:rsid="008dcc5e" officeooo:paragraph-rsid="008dcc5e"/>
    </style:style>
    <style:style style:name="P109" style:family="paragraph" style:parent-style-name="Table_20_Contents" style:list-style-name="L9">
      <style:text-properties officeooo:rsid="008f5a08" officeooo:paragraph-rsid="008f5a08"/>
    </style:style>
    <style:style style:name="P110" style:family="paragraph" style:parent-style-name="Table_20_Contents" style:list-style-name="L9">
      <style:text-properties officeooo:rsid="010220c9" officeooo:paragraph-rsid="010220c9"/>
    </style:style>
    <style:style style:name="P111" style:family="paragraph" style:parent-style-name="Table_20_Contents">
      <style:text-properties officeooo:rsid="009095d1" officeooo:paragraph-rsid="009095d1"/>
    </style:style>
    <style:style style:name="P112" style:family="paragraph" style:parent-style-name="Table_20_Contents">
      <style:text-properties fo:color="#127622" loext:opacity="100%" officeooo:rsid="009095d1" officeooo:paragraph-rsid="009095d1"/>
    </style:style>
    <style:style style:name="P113" style:family="paragraph" style:parent-style-name="Table_20_Contents">
      <style:text-properties fo:color="#127622" loext:opacity="100%" officeooo:rsid="00968180" officeooo:paragraph-rsid="00968180"/>
    </style:style>
    <style:style style:name="P114" style:family="paragraph" style:parent-style-name="Table_20_Contents">
      <style:text-properties officeooo:rsid="00972c9c" officeooo:paragraph-rsid="01082a47"/>
    </style:style>
    <style:style style:name="P115" style:family="paragraph" style:parent-style-name="Table_20_Contents">
      <style:text-properties officeooo:rsid="0095ab17" officeooo:paragraph-rsid="0095ab17"/>
    </style:style>
    <style:style style:name="P116" style:family="paragraph" style:parent-style-name="Table_20_Contents">
      <style:text-properties fo:color="#127622" loext:opacity="100%" officeooo:rsid="0095c06d" officeooo:paragraph-rsid="0095c06d"/>
    </style:style>
    <style:style style:name="P117" style:family="paragraph" style:parent-style-name="Table_20_Contents">
      <style:text-properties officeooo:rsid="01203486" officeooo:paragraph-rsid="01203486"/>
    </style:style>
    <style:style style:name="P118" style:family="paragraph" style:parent-style-name="Table_20_Contents">
      <style:text-properties officeooo:rsid="0098e08d" officeooo:paragraph-rsid="0098e08d"/>
    </style:style>
    <style:style style:name="P119" style:family="paragraph" style:parent-style-name="Table_20_Contents">
      <style:text-properties fo:color="#127622" loext:opacity="100%" officeooo:rsid="009b77b1" officeooo:paragraph-rsid="009b77b1"/>
    </style:style>
    <style:style style:name="P120" style:family="paragraph" style:parent-style-name="Table_20_Contents">
      <style:text-properties officeooo:rsid="00a0240d" officeooo:paragraph-rsid="00a0240d"/>
    </style:style>
    <style:style style:name="P121" style:family="paragraph" style:parent-style-name="Table_20_Contents">
      <style:text-properties fo:color="#127622" loext:opacity="100%" officeooo:rsid="00a0240d" officeooo:paragraph-rsid="00a0240d"/>
    </style:style>
    <style:style style:name="P122" style:family="paragraph" style:parent-style-name="Table_20_Contents">
      <style:text-properties officeooo:rsid="00a15697" officeooo:paragraph-rsid="00a15697"/>
    </style:style>
    <style:style style:name="P123" style:family="paragraph" style:parent-style-name="Table_20_Contents">
      <style:text-properties fo:color="#127622" loext:opacity="100%" officeooo:rsid="00a15697" officeooo:paragraph-rsid="00a15697"/>
    </style:style>
    <style:style style:name="P124" style:family="paragraph" style:parent-style-name="Table_20_Contents">
      <style:text-properties fo:color="#127622" loext:opacity="100%" officeooo:rsid="01101aff" officeooo:paragraph-rsid="01101aff"/>
    </style:style>
    <style:style style:name="P125" style:family="paragraph" style:parent-style-name="Table_20_Contents">
      <style:text-properties officeooo:rsid="01101aff" officeooo:paragraph-rsid="01101aff"/>
    </style:style>
    <style:style style:name="P126" style:family="paragraph" style:parent-style-name="Table_20_Contents">
      <style:text-properties officeooo:rsid="00a55915" officeooo:paragraph-rsid="00a55915"/>
    </style:style>
    <style:style style:name="P127" style:family="paragraph" style:parent-style-name="Table_20_Contents">
      <style:text-properties fo:color="#127622" loext:opacity="100%" officeooo:rsid="00a55915"/>
    </style:style>
    <style:style style:name="P128" style:family="paragraph" style:parent-style-name="Table_20_Contents">
      <style:text-properties officeooo:rsid="00a5dd04" officeooo:paragraph-rsid="00a5dd04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a6d235" officeooo:paragraph-rsid="00a6d235" style:font-weight-asian="bold" style:font-weight-complex="bold"/>
    </style:style>
    <style:style style:name="P130" style:family="paragraph" style:parent-style-name="Table_20_Contents">
      <style:text-properties officeooo:rsid="00a77341" officeooo:paragraph-rsid="00a77341"/>
    </style:style>
    <style:style style:name="P131" style:family="paragraph" style:parent-style-name="Table_20_Contents">
      <style:text-properties fo:color="#127622" loext:opacity="100%" officeooo:rsid="00a77341" officeooo:paragraph-rsid="00a77341"/>
    </style:style>
    <style:style style:name="P132" style:family="paragraph" style:parent-style-name="Table_20_Contents">
      <style:text-properties officeooo:rsid="00ada3bb" officeooo:paragraph-rsid="00ada3bb"/>
    </style:style>
    <style:style style:name="P133" style:family="paragraph" style:parent-style-name="Table_20_Contents" style:list-style-name="L10">
      <style:text-properties officeooo:paragraph-rsid="00ae31cf"/>
    </style:style>
    <style:style style:name="P134" style:family="paragraph" style:parent-style-name="Table_20_Contents" style:list-style-name="L10">
      <style:text-properties officeooo:paragraph-rsid="00b144f0"/>
    </style:style>
    <style:style style:name="P135" style:family="paragraph" style:parent-style-name="Table_20_Contents" style:list-style-name="L10">
      <style:text-properties officeooo:rsid="00b28ecd" officeooo:paragraph-rsid="00b28ecd"/>
    </style:style>
    <style:style style:name="P136" style:family="paragraph" style:parent-style-name="Table_20_Contents" style:list-style-name="L10">
      <style:text-properties officeooo:rsid="010586be" officeooo:paragraph-rsid="010586be"/>
    </style:style>
    <style:style style:name="P137" style:family="paragraph" style:parent-style-name="Table_20_Contents" style:list-style-name="L10">
      <style:text-properties officeooo:rsid="010db28d" officeooo:paragraph-rsid="010db28d"/>
    </style:style>
    <style:style style:name="P138" style:family="paragraph" style:parent-style-name="Table_20_Contents" style:list-style-name="L10">
      <style:text-properties officeooo:rsid="00b38fbb" officeooo:paragraph-rsid="00b38fbb"/>
    </style:style>
    <style:style style:name="P139" style:family="paragraph" style:parent-style-name="Table_20_Contents" style:list-style-name="L10">
      <style:text-properties officeooo:rsid="00b716ae" officeooo:paragraph-rsid="00b716ae"/>
    </style:style>
    <style:style style:name="P140" style:family="paragraph" style:parent-style-name="Table_20_Contents" style:list-style-name="L10">
      <style:text-properties officeooo:rsid="00b8922f" officeooo:paragraph-rsid="00b8922f"/>
    </style:style>
    <style:style style:name="P141" style:family="paragraph" style:parent-style-name="Table_20_Contents" style:list-style-name="L10">
      <style:text-properties officeooo:rsid="00ba3b74" officeooo:paragraph-rsid="00ba3b74"/>
    </style:style>
    <style:style style:name="P142" style:family="paragraph" style:parent-style-name="Table_20_Contents">
      <style:text-properties officeooo:rsid="00ba3b74" officeooo:paragraph-rsid="00ba3b74"/>
    </style:style>
    <style:style style:name="P143" style:family="paragraph" style:parent-style-name="Table_20_Contents">
      <style:text-properties officeooo:rsid="01239c6a" officeooo:paragraph-rsid="01239c6a"/>
    </style:style>
    <style:style style:name="T1" style:family="text">
      <style:text-properties fo:color="#127622" loext:opacity="100%"/>
    </style:style>
    <style:style style:name="T2" style:family="text">
      <style:text-properties officeooo:rsid="0027aec4"/>
    </style:style>
    <style:style style:name="T3" style:family="text">
      <style:text-properties officeooo:rsid="0115819e"/>
    </style:style>
    <style:style style:name="T4" style:family="text">
      <style:text-properties officeooo:rsid="00319573"/>
    </style:style>
    <style:style style:name="T5" style:family="text">
      <style:text-properties officeooo:rsid="0033765d"/>
    </style:style>
    <style:style style:name="T6" style:family="text">
      <style:text-properties officeooo:rsid="00347fa9"/>
    </style:style>
    <style:style style:name="T7" style:family="text">
      <style:text-properties officeooo:rsid="00cae59d"/>
    </style:style>
    <style:style style:name="T8" style:family="text">
      <style:text-properties officeooo:rsid="00ec6a46"/>
    </style:style>
    <style:style style:name="T9" style:family="text">
      <style:text-properties officeooo:rsid="00cb1eda"/>
    </style:style>
    <style:style style:name="T10" style:family="text">
      <style:text-properties officeooo:rsid="00f01c15"/>
    </style:style>
    <style:style style:name="T11" style:family="text">
      <style:text-properties officeooo:rsid="00ce76cd"/>
    </style:style>
    <style:style style:name="T12" style:family="text">
      <style:text-properties officeooo:rsid="00f177f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f19696"/>
    </style:style>
    <style:style style:name="T16" style:family="text">
      <style:text-properties fo:font-weight="bold" officeooo:rsid="0078e477" style:font-weight-asian="bold" style:font-weight-complex="bold"/>
    </style:style>
    <style:style style:name="T17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db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9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992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officeooo:rsid="001d13d4"/>
    </style:style>
    <style:style style:name="T24" style:family="text">
      <style:text-properties officeooo:rsid="001e2730"/>
    </style:style>
    <style:style style:name="T25" style:family="text">
      <style:text-properties officeooo:rsid="007fc5f8"/>
    </style:style>
    <style:style style:name="T26" style:family="text">
      <style:text-properties officeooo:rsid="00fa20df"/>
    </style:style>
    <style:style style:name="T27" style:family="text">
      <style:text-properties officeooo:rsid="00fa7533"/>
    </style:style>
    <style:style style:name="T28" style:family="text">
      <style:text-properties officeooo:rsid="00faf1f8"/>
    </style:style>
    <style:style style:name="T29" style:family="text">
      <style:text-properties officeooo:rsid="0030b1ac"/>
    </style:style>
    <style:style style:name="T30" style:family="text">
      <style:text-properties officeooo:rsid="00309b2d"/>
    </style:style>
    <style:style style:name="T31" style:family="text">
      <style:text-properties fo:font-weight="bold" officeooo:rsid="00309b2d" style:font-weight-asian="bold" style:font-weight-complex="bold"/>
    </style:style>
    <style:style style:name="T32" style:family="text">
      <style:text-properties officeooo:rsid="003a9d66"/>
    </style:style>
    <style:style style:name="T33" style:family="text">
      <style:text-properties officeooo:rsid="0038a89a"/>
    </style:style>
    <style:style style:name="T34" style:family="text">
      <style:text-properties fo:font-weight="bold" officeooo:rsid="0038a89a" style:font-weight-asian="bold" style:font-weight-complex="bold"/>
    </style:style>
    <style:style style:name="T35" style:family="text">
      <style:text-properties officeooo:rsid="004a5fca"/>
    </style:style>
    <style:style style:name="T36" style:family="text">
      <style:text-properties fo:font-weight="bold" officeooo:rsid="004a5fca" style:font-weight-asian="bold" style:font-weight-complex="bold"/>
    </style:style>
    <style:style style:name="T37" style:family="text">
      <style:text-properties officeooo:rsid="004c27d4"/>
    </style:style>
    <style:style style:name="T38" style:family="text">
      <style:text-properties officeooo:rsid="00bf2066"/>
    </style:style>
    <style:style style:name="T39" style:family="text">
      <style:text-properties fo:color="#127622" loext:opacity="100%" officeooo:rsid="00d42060"/>
    </style:style>
    <style:style style:name="T40" style:family="text">
      <style:text-properties officeooo:rsid="00c02a1e"/>
    </style:style>
    <style:style style:name="T41" style:family="text">
      <style:text-properties officeooo:rsid="005a073d"/>
    </style:style>
    <style:style style:name="T42" style:family="text">
      <style:text-properties officeooo:rsid="00741e2e"/>
    </style:style>
    <style:style style:name="T43" style:family="text">
      <style:text-properties officeooo:rsid="005314ef"/>
    </style:style>
    <style:style style:name="T44" style:family="text">
      <style:text-properties officeooo:rsid="0055159c"/>
    </style:style>
    <style:style style:name="T45" style:family="text">
      <style:text-properties officeooo:rsid="00e97b45"/>
    </style:style>
    <style:style style:name="T46" style:family="text">
      <style:text-properties officeooo:rsid="005a36df"/>
    </style:style>
    <style:style style:name="T47" style:family="text">
      <style:text-properties officeooo:rsid="006447ce"/>
    </style:style>
    <style:style style:name="T48" style:family="text">
      <style:text-properties officeooo:rsid="00d7a00c"/>
    </style:style>
    <style:style style:name="T49" style:family="text">
      <style:text-properties fo:color="#127622" loext:opacity="100%" officeooo:rsid="006447ce"/>
    </style:style>
    <style:style style:name="T50" style:family="text">
      <style:text-properties officeooo:rsid="00d8804d"/>
    </style:style>
    <style:style style:name="T51" style:family="text">
      <style:text-properties fo:font-weight="bold" officeooo:rsid="00d8804d" style:font-weight-asian="bold" style:font-weight-complex="bold"/>
    </style:style>
    <style:style style:name="T52" style:family="text">
      <style:text-properties officeooo:rsid="005b35c7"/>
    </style:style>
    <style:style style:name="T53" style:family="text">
      <style:text-properties officeooo:rsid="007b864e"/>
    </style:style>
    <style:style style:name="T54" style:family="text">
      <style:text-properties officeooo:rsid="00ebc56d"/>
    </style:style>
    <style:style style:name="T55" style:family="text">
      <style:text-properties fo:color="#127622" loext:opacity="100%" officeooo:rsid="005b35c7"/>
    </style:style>
    <style:style style:name="T56" style:family="text">
      <style:text-properties officeooo:rsid="0078e477"/>
    </style:style>
    <style:style style:name="T57" style:family="text">
      <style:text-properties officeooo:rsid="00eb3d8e"/>
    </style:style>
    <style:style style:name="T58" style:family="text">
      <style:text-properties officeooo:rsid="007a319d"/>
    </style:style>
    <style:style style:name="T59" style:family="text">
      <style:text-properties fo:font-weight="bold" officeooo:rsid="007a319d" style:font-weight-asian="bold" style:font-weight-complex="bold"/>
    </style:style>
    <style:style style:name="T60" style:family="text">
      <style:text-properties officeooo:rsid="0058fce0"/>
    </style:style>
    <style:style style:name="T61" style:family="text">
      <style:text-properties fo:color="#127622" loext:opacity="100%" officeooo:rsid="0058fce0"/>
    </style:style>
    <style:style style:name="T62" style:family="text">
      <style:text-properties officeooo:rsid="00573de9"/>
    </style:style>
    <style:style style:name="T63" style:family="text">
      <style:text-properties fo:color="#127622" loext:opacity="100%" officeooo:rsid="00573de9"/>
    </style:style>
    <style:style style:name="T64" style:family="text">
      <style:text-properties officeooo:rsid="00f6673a"/>
    </style:style>
    <style:style style:name="T65" style:family="text">
      <style:text-properties fo:color="#127622" loext:opacity="100%" officeooo:rsid="00f6673a"/>
    </style:style>
    <style:style style:name="T66" style:family="text">
      <style:text-properties officeooo:rsid="00f829c3"/>
    </style:style>
    <style:style style:name="T67" style:family="text">
      <style:text-properties fo:color="#127622" loext:opacity="100%" officeooo:rsid="00f829c3"/>
    </style:style>
    <style:style style:name="T68" style:family="text">
      <style:text-properties officeooo:rsid="006702d7"/>
    </style:style>
    <style:style style:name="T69" style:family="text">
      <style:text-properties officeooo:rsid="006852d6"/>
    </style:style>
    <style:style style:name="T70" style:family="text">
      <style:text-properties fo:color="#127622" loext:opacity="100%" officeooo:rsid="006852d6"/>
    </style:style>
    <style:style style:name="T71" style:family="text">
      <style:text-properties fo:font-weight="bold" officeooo:rsid="006852d6" style:font-weight-asian="bold" style:font-weight-complex="bold"/>
    </style:style>
    <style:style style:name="T72" style:family="text">
      <style:text-properties officeooo:rsid="006a0d72"/>
    </style:style>
    <style:style style:name="T73" style:family="text">
      <style:text-properties officeooo:rsid="006e4615"/>
    </style:style>
    <style:style style:name="T74" style:family="text">
      <style:text-properties officeooo:rsid="006ce0b9"/>
    </style:style>
    <style:style style:name="T75" style:family="text">
      <style:text-properties fo:color="#127622" loext:opacity="100%" officeooo:rsid="006ce0b9"/>
    </style:style>
    <style:style style:name="T76" style:family="text">
      <style:text-properties officeooo:rsid="00706851"/>
    </style:style>
    <style:style style:name="T77" style:family="text">
      <style:text-properties officeooo:rsid="006ebd30"/>
    </style:style>
    <style:style style:name="T78" style:family="text">
      <style:text-properties fo:font-weight="bold" officeooo:rsid="006ebd30" style:font-weight-asian="bold" style:font-weight-complex="bold"/>
    </style:style>
    <style:style style:name="T79" style:family="text">
      <style:text-properties officeooo:rsid="00c4b888"/>
    </style:style>
    <style:style style:name="T80" style:family="text">
      <style:text-properties officeooo:rsid="00c56565"/>
    </style:style>
    <style:style style:name="T81" style:family="text">
      <style:text-properties officeooo:rsid="0119bcbe"/>
    </style:style>
    <style:style style:name="T82" style:family="text">
      <style:text-properties fo:color="#127622" loext:opacity="100%" officeooo:rsid="00e58740"/>
    </style:style>
    <style:style style:name="T83" style:family="text">
      <style:text-properties officeooo:rsid="007477ca"/>
    </style:style>
    <style:style style:name="T84" style:family="text">
      <style:text-properties fo:font-weight="bold" officeooo:rsid="007477ca" style:font-weight-asian="bold" style:font-weight-complex="bold"/>
    </style:style>
    <style:style style:name="T85" style:family="text">
      <style:text-properties officeooo:rsid="00c02bbc"/>
    </style:style>
    <style:style style:name="T86" style:family="text">
      <style:text-properties fo:color="#127622" loext:opacity="100%" officeooo:rsid="0075dcfc"/>
    </style:style>
    <style:style style:name="T87" style:family="text">
      <style:text-properties fo:color="#127622" loext:opacity="100%" officeooo:rsid="00feed61"/>
    </style:style>
    <style:style style:name="T88" style:family="text">
      <style:text-properties fo:color="#127622" loext:opacity="100%" officeooo:rsid="00ff70cc"/>
    </style:style>
    <style:style style:name="T89" style:family="text">
      <style:text-properties officeooo:rsid="00fe6434"/>
    </style:style>
    <style:style style:name="T90" style:family="text">
      <style:text-properties officeooo:rsid="00d3bfcf"/>
    </style:style>
    <style:style style:name="T91" style:family="text">
      <style:text-properties officeooo:rsid="0076627e"/>
    </style:style>
    <style:style style:name="T92" style:family="text">
      <style:text-properties fo:font-weight="bold" officeooo:rsid="0076627e" style:font-weight-asian="bold" style:font-weight-complex="bold"/>
    </style:style>
    <style:style style:name="T93" style:family="text">
      <style:text-properties officeooo:rsid="010eb81e"/>
    </style:style>
    <style:style style:name="T94" style:family="text">
      <style:text-properties fo:color="#127622" loext:opacity="100%" officeooo:rsid="00e389ad"/>
    </style:style>
    <style:style style:name="T95" style:family="text">
      <style:text-properties officeooo:rsid="00dee157"/>
    </style:style>
    <style:style style:name="T96" style:family="text">
      <style:text-properties officeooo:rsid="00e11337"/>
    </style:style>
    <style:style style:name="T97" style:family="text">
      <style:text-properties fo:color="#ff0000" loext:opacity="100%"/>
    </style:style>
    <style:style style:name="T98" style:family="text">
      <style:text-properties fo:color="#ff0000" loext:opacity="100%" officeooo:rsid="00dee157"/>
    </style:style>
    <style:style style:name="T99" style:family="text">
      <style:text-properties officeooo:rsid="00c3cc9b"/>
    </style:style>
    <style:style style:name="T100" style:family="text">
      <style:text-properties officeooo:rsid="0124c484"/>
    </style:style>
    <style:style style:name="T101" style:family="text">
      <style:text-properties officeooo:rsid="00788f68"/>
    </style:style>
    <style:style style:name="T102" style:family="text">
      <style:text-properties officeooo:rsid="00c1eca2"/>
    </style:style>
    <style:style style:name="T103" style:family="text">
      <style:text-properties fo:color="#127622" loext:opacity="100%" officeooo:rsid="00e31017"/>
    </style:style>
    <style:style style:name="T104" style:family="text">
      <style:text-properties officeooo:rsid="0082fd4b"/>
    </style:style>
    <style:style style:name="T105" style:family="text">
      <style:text-properties officeooo:rsid="00832aee"/>
    </style:style>
    <style:style style:name="T106" style:family="text">
      <style:text-properties fo:color="#127622" loext:opacity="100%" officeooo:rsid="00832aee"/>
    </style:style>
    <style:style style:name="T107" style:family="text">
      <style:text-properties officeooo:rsid="008364b5"/>
    </style:style>
    <style:style style:name="T108" style:family="text">
      <style:text-properties officeooo:rsid="00884076"/>
    </style:style>
    <style:style style:name="T109" style:family="text">
      <style:text-properties officeooo:rsid="00c83961"/>
    </style:style>
    <style:style style:name="T110" style:family="text">
      <style:text-properties officeooo:rsid="0100fa3a"/>
    </style:style>
    <style:style style:name="T111" style:family="text">
      <style:text-properties officeooo:rsid="00ff7ffc"/>
    </style:style>
    <style:style style:name="T112" style:family="text">
      <style:text-properties officeooo:rsid="00c99736"/>
    </style:style>
    <style:style style:name="T113" style:family="text">
      <style:text-properties officeooo:rsid="008beb9a"/>
    </style:style>
    <style:style style:name="T114" style:family="text">
      <style:text-properties officeooo:rsid="008ab16e"/>
    </style:style>
    <style:style style:name="T115" style:family="text">
      <style:text-properties fo:color="#127622" loext:opacity="100%" officeooo:rsid="008ab16e"/>
    </style:style>
    <style:style style:name="T116" style:family="text">
      <style:text-properties officeooo:rsid="008eea47"/>
    </style:style>
    <style:style style:name="T117" style:family="text">
      <style:text-properties officeooo:rsid="0103feda"/>
    </style:style>
    <style:style style:name="T118" style:family="text">
      <style:text-properties officeooo:rsid="01082a47"/>
    </style:style>
    <style:style style:name="T119" style:family="text">
      <style:text-properties officeooo:rsid="010779cf"/>
    </style:style>
    <style:style style:name="T120" style:family="text">
      <style:text-properties officeooo:rsid="009c7145"/>
    </style:style>
    <style:style style:name="T121" style:family="text">
      <style:text-properties officeooo:rsid="0095c06d"/>
    </style:style>
    <style:style style:name="T122" style:family="text">
      <style:text-properties fo:color="#127622" loext:opacity="100%" officeooo:rsid="010b1fe7"/>
    </style:style>
    <style:style style:name="T123" style:family="text">
      <style:text-properties officeooo:rsid="010b1fe7"/>
    </style:style>
    <style:style style:name="T124" style:family="text">
      <style:text-properties officeooo:rsid="009b18e6"/>
    </style:style>
    <style:style style:name="T125" style:family="text">
      <style:text-properties officeooo:rsid="009a9339"/>
    </style:style>
    <style:style style:name="T126" style:family="text">
      <style:text-properties officeooo:rsid="009b9f86"/>
    </style:style>
    <style:style style:name="T127" style:family="text">
      <style:text-properties officeooo:rsid="00a205f1"/>
    </style:style>
    <style:style style:name="T128" style:family="text">
      <style:text-properties officeooo:rsid="00a33dd7"/>
    </style:style>
    <style:style style:name="T129" style:family="text">
      <style:text-properties fo:font-weight="bold" officeooo:rsid="00a205f1" style:font-weight-asian="bold" style:font-weight-complex="bold"/>
    </style:style>
    <style:style style:name="T130" style:family="text">
      <style:text-properties officeooo:rsid="010de222"/>
    </style:style>
    <style:style style:name="T131" style:family="text">
      <style:text-properties officeooo:rsid="00ca6df5"/>
    </style:style>
    <style:style style:name="T132" style:family="text">
      <style:text-properties officeooo:rsid="011236a1"/>
    </style:style>
    <style:style style:name="T133" style:family="text">
      <style:text-properties fo:color="#127622" loext:opacity="100%" officeooo:rsid="00ada3bb"/>
    </style:style>
    <style:style style:name="T134" style:family="text">
      <style:text-properties officeooo:rsid="00ada3bb"/>
    </style:style>
    <style:style style:name="T135" style:family="text">
      <style:text-properties fo:color="#ff0000" loext:opacity="100%" officeooo:rsid="00ada3bb"/>
    </style:style>
    <style:style style:name="T136" style:family="text">
      <style:text-properties fo:color="#127622" loext:opacity="100%" officeooo:rsid="006a0d72"/>
    </style:style>
    <style:style style:name="T137" style:family="text">
      <style:text-properties officeooo:rsid="00ae583a"/>
    </style:style>
    <style:style style:name="T138" style:family="text">
      <style:text-properties fo:color="#127622" loext:opacity="100%" officeooo:rsid="00b144f0"/>
    </style:style>
    <style:style style:name="T139" style:family="text">
      <style:text-properties officeooo:rsid="00b144f0"/>
    </style:style>
    <style:style style:name="T140" style:family="text">
      <style:text-properties fo:color="#ff0000" loext:opacity="100%" officeooo:rsid="00b144f0"/>
    </style:style>
    <style:style style:name="T141" style:family="text">
      <style:text-properties officeooo:rsid="00b38fbb"/>
    </style:style>
    <style:style style:name="T142" style:family="text">
      <style:text-properties officeooo:rsid="010cac9a"/>
    </style:style>
    <style:style style:name="T143" style:family="text">
      <style:text-properties officeooo:rsid="00b572df"/>
    </style:style>
    <style:style style:name="T144" style:family="text">
      <style:text-properties officeooo:rsid="00d0489d"/>
    </style:style>
    <style:style style:name="T145" style:family="text">
      <style:text-properties officeooo:rsid="00bc3be2"/>
    </style:style>
    <style:style style:name="T146" style:family="text">
      <style:text-properties officeooo:rsid="00bd8438"/>
    </style:style>
    <style:style style:name="T147" style:family="text">
      <style:text-properties officeooo:rsid="00bb863d"/>
    </style:style>
    <style:style style:name="T148" style:family="text">
      <style:text-properties officeooo:rsid="01255c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ble/Parables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Book</text:p>
          </table:table-cell>
          <table:table-cell table:style-name="Table3.A1" office:value-type="string">
            <text:p text:style-name="P2">Occurrences</text:p>
          </table:table-cell>
          <table:table-cell table:style-name="Table3.A1" office:value-type="string">
            <text:p text:style-name="P2">Verses</text:p>
          </table:table-cell>
          <table:table-cell table:style-name="Table3.D1" office:value-type="string">
            <text:p text:style-name="P2">Chapters</text:p>
          </table:table-cell>
        </table:table-row>
        <table:table-row>
          <table:table-cell table:style-name="Table3.A2" office:value-type="string">
            <text:p text:style-name="P3">Matthew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6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Mark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P4">11</text:p>
          </table:table-cell>
          <table:table-cell table:style-name="Table3.D2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3">Luke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7</text:p>
          </table:table-cell>
          <table:table-cell table:style-name="Table3.D2" office:value-type="string">
            <text:p text:style-name="P4">11</text:p>
          </table:table-cell>
        </table:table-row>
        <table:table-row>
          <table:table-cell table:style-name="Table3.A2" office:value-type="string">
            <text:p text:style-name="P3">John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4">1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6" table:formula="ooow:sum(&lt;B2:B5&gt;)" office:value-type="float" office:value="47">
            <text:p text:style-name="P7">47</text:p>
          </table:table-cell>
          <table:table-cell table:style-name="Table3.B6" table:formula="ooow:sum(&lt;C2:C5&gt;)" office:value-type="float" office:value="45">
            <text:p text:style-name="P7">45</text:p>
          </table:table-cell>
          <table:table-cell table:style-name="Table3.D6" table:formula="ooow:sum(&lt;D2:D5&gt;)" office:value-type="float" office:value="22">
            <text:p text:style-name="P7">22</text:p>
          </table:table-cell>
        </table:table-row>
      </table:table>
      <text:p text:style-name="P8"/>
      <text:p text:style-name="P9"><text:span text:style-name="T1">Matthew</text:span> and <text:span text:style-name="T1">Mark</text:span> both include this phrase but <text:span text:style-name="T1">Luke</text:span> does no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Matthew 13:34</text:span><text:line-break/>All these things spake Jesus unto the multitude in parables; and without a parable spake he not unto them:</text:p>
          </table:table-cell>
          <table:table-cell table:style-name="Table2.B1" office:value-type="string">
            <text:p text:style-name="P10"><text:span text:style-name="T1">Mark 4:34</text:span><text:line-break/>But without a parable spake he not unto them: and when they were alone, he expounded all things to his disciples.</text:p>
          </table:table-cell>
        </table:table-row>
      </table:table>
      <text:p text:style-name="P11"/>
      <text:p text:style-name="P12">The following table includes only parables that are explicitly or implicitly called a parable. It does not include verses, phrases, figures of speech, or even what appears to be a parable unless it is explicitly or implicitly called a parable in scripture.</text:p>
      <text:p text:style-name="P13"/>
      <text:p text:style-name="P13"><text:span text:style-name="T2">An</text:span> explicit <text:span text:style-name="T2">parable is </text:span><text:span text:style-name="T3">one that is </text:span><text:span text:style-name="T2">called a parable in scripture. An implicit parable is a parallel passage to an explicit parable. </text:span><text:span text:style-name="T4">Parables that are </text:span><text:span text:style-name="T5">clear</text:span><text:span text:style-name="T6">ly </text:span><text:span text:style-name="T4">parallel passages are not counted to avoid counting the same parable more than once. </text:span><text:span text:style-name="T7">There are </text:span><text:span text:style-name="T8">9</text:span><text:span text:style-name="T9"> </text:span><text:span text:style-name="T7">parables </text:span><text:span text:style-name="T10">total </text:span><text:span text:style-name="T7">that are not explicitly called parables in their </text:span><text:span text:style-name="T11">context</text:span><text:span text:style-name="T7"> but they are implicitly a parable due to being </text:span><text:span text:style-name="T12">reasonably similar to an</text:span><text:span text:style-name="T7"> explicitly named parable in another book.</text:span></text:p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Matthew</text:p>
          </table:table-cell>
          <table:table-cell table:style-name="Table1.A1" office:value-type="string">
            <text:p text:style-name="P15">Mark</text:p>
          </table:table-cell>
          <table:table-cell table:style-name="Table1.C1" office:value-type="string">
            <text:p text:style-name="P15">Luke</text:p>
          </table:table-cell>
        </table:table-row>
        <table:table-row table:style-name="Table1.1">
          <table:table-cell table:style-name="Table1.A2" office:value-type="string">
            <text:p text:style-name="Table_20_Contents">#<text:span text:style-name="T13">15</text:span>-#<text:span text:style-name="T13">18</text:span><text:span text:style-name="T14"> </text:span>(implicit)</text:p>
            <text:p text:style-name="P16">Mat 12:25-37</text:p>
            <text:p text:style-name="P17"/>
            <text:p text:style-name="P18">Has other phrases <text:span text:style-name="T15">in the same paragraph that</text:span> may be identified as parables but they are not called parables anywhere in scripture:</text:p>
            <text:list text:style-name="L1">
              <text:list-item>
                <text:p text:style-name="P19">The good &amp; corrupt tree and their fruit</text:p>
              </text:list-item>
              <text:list-item>
                <text:p text:style-name="P20">The good &amp; evil treasure of the heart</text:p>
              </text:list-item>
            </text:list>
          </table:table-cell>
          <table:table-cell table:style-name="Table1.A2" office:value-type="string">
            <text:p text:style-name="Table_20_Contents">#<text:span text:style-name="T13">1</text:span><text:span text:style-name="T16">5</text:span>-#<text:span text:style-name="T13">1</text:span><text:span text:style-name="T16">8</text:span> (explicit)</text:p>
            <text:p text:style-name="P21"><text:span text:style-name="T17">Mar 3:23-2</text:span><text:span text:style-name="T18">9</text:span><text:span text:style-name="T19"> (</text:span><text:span text:style-name="T20">v</text:span><text:span text:style-name="T21">23</text:span><text:span text:style-name="T20"> </text:span><text:span text:style-name="T19">“</text:span><text:span text:style-name="T20">parable</text:span><text:span text:style-name="T22">s</text:span><text:span text:style-name="T20">”)</text:span></text:p>
            <text:list text:style-name="L2">
              <text:list-item>
                <text:p text:style-name="P22">Satan <text:span text:style-name="T23">divided against himself</text:span></text:p>
              </text:list-item>
              <text:list-item>
                <text:p text:style-name="P22"><text:span text:style-name="T23">A k</text:span>ingdom <text:span text:style-name="T23">divided against itself</text:span></text:p>
              </text:list-item>
              <text:list-item>
                <text:p text:style-name="P22"><text:span text:style-name="T23">A ho</text:span>use <text:span text:style-name="T23">divided against itself</text:span></text:p>
              </text:list-item>
              <text:list-item>
                <text:p text:style-name="P23">The binding <text:span text:style-name="T24">and spoiling </text:span>of the strong man</text:p>
              </text:list-item>
            </text:list>
          </table:table-cell>
          <table:table-cell table:style-name="Table1.C2" office:value-type="string">
            <text:p text:style-name="P24">#<text:span text:style-name="T13">15</text:span>-#<text:span text:style-name="T13">18</text:span> <text:span text:style-name="T25">(implicit)</text:span></text:p>
            <text:p text:style-name="P25">Luk 11:17-26</text:p>
            <text:p text:style-name="P26"/>
            <text:p text:style-name="P26">Has <text:span text:style-name="T26">another</text:span> phrase that may be identified as <text:span text:style-name="T27">a </text:span>parable but <text:span text:style-name="T28">it is </text:span>not called <text:span text:style-name="T28">a </text:span>parable anywhere in scripture:</text:p>
            <text:list text:style-name="L3">
              <text:list-item>
                <text:p text:style-name="P27">The unclean spirit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8">#<text:span text:style-name="T13">1</text:span> The Sower (explicit)</text:p>
            <text:p text:style-name="P29">Mat <text:span text:style-name="T29">13:3-8, 19-23</text:span></text:p>
          </table:table-cell>
          <table:table-cell table:style-name="Table1.A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Mar 4:2-8, 14-20</text:p>
          </table:table-cell>
          <table:table-cell table:style-name="Table1.C2" office:value-type="string">
            <text:p text:style-name="P30"><text:span text:style-name="T30">#</text:span><text:span text:style-name="T31">1</text:span><text:span text:style-name="T30"> </text:span>The Sower (explicit)</text:p>
            <text:p text:style-name="P31">Luk 8:5-8, 11-15</text:p>
          </table:table-cell>
        </table:table-row>
        <table:table-row table:style-name="Table1.1">
          <table:table-cell table:style-name="Table1.A2" office:value-type="string">
            <text:p text:style-name="P32">#<text:span text:style-name="T13">2</text:span> The Wheat &amp; the Tares (explicit)</text:p>
            <text:p text:style-name="P33">Mat 13:24-30, 37-4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34">#<text:span text:style-name="T13">3</text:span> The Mustard Seed <text:span text:style-name="T32">(explicit)</text:span></text:p>
            <text:p text:style-name="P35">Mat 13:31,32</text:p>
          </table:table-cell>
          <table:table-cell table:style-name="Table1.A2" office:value-type="string">
            <text:p text:style-name="P36"><text:span text:style-name="T33">#</text:span><text:span text:style-name="T34">3</text:span><text:span text:style-name="T33"> </text:span>The Mustard Seed (explicit; <text:span text:style-name="T1">Mar 4:33</text:span>)</text:p>
            <text:p text:style-name="P37">Mar 4:30-32</text:p>
          </table:table-cell>
          <table:table-cell table:style-name="Table1.C2" office:value-type="string">
            <text:p text:style-name="P36"><text:span text:style-name="T33">#</text:span><text:span text:style-name="T34">3</text:span><text:span text:style-name="T33"> </text:span>The Mustard Seed (implicit)</text:p>
            <text:p text:style-name="P37">Luk 13:18,19</text:p>
          </table:table-cell>
        </table:table-row>
        <table:table-row table:style-name="Table1.1">
          <table:table-cell table:style-name="Table1.A2" office:value-type="string">
            <text:p text:style-name="P38">#<text:span text:style-name="T13">4</text:span> Leaven <text:span text:style-name="T35">(explicit)</text:span></text:p>
            <text:p text:style-name="P39">Mat 13:3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0">#<text:span text:style-name="T13">4</text:span> Leaven (implicit)</text:p>
            <text:p text:style-name="P39">Luk 13:20,21</text:p>
          </table:table-cell>
        </table:table-row>
        <table:table-row table:style-name="Table1.1">
          <table:table-cell table:style-name="Table1.A7" office:value-type="string">
            <text:p text:style-name="P41"><text:span text:style-name="T35">#</text:span><text:span text:style-name="T36">5</text:span> <text:span text:style-name="T35">Hid Treasure </text:span><text:span text:style-name="T37">(</text:span><text:span text:style-name="T38">explicit</text:span><text:span text:style-name="T37">; </text:span><text:span text:style-name="T39">Mat 13:53</text:span><text:span text:style-name="T37">)</text:span></text:p>
            <text:p text:style-name="P42">Mat 13:4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3">#<text:span text:style-name="T13">6</text:span> A Pearl of Great Price (<text:span text:style-name="T38">explicit</text:span>; <text:span text:style-name="T39">Mat 13:53</text:span>)</text:p>
            <text:p text:style-name="P42">Mat 13:45,4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P44">#<text:span text:style-name="T13">7</text:span> Net in the Sea (<text:span text:style-name="T40">explicit</text:span>; <text:span text:style-name="T39">Mat 13:53</text:span>)</text:p>
            <text:p text:style-name="P45">Mat 13:47-5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7" office:value-type="string">
            <text:p text:style-name="P46">#<text:span text:style-name="T13">8</text:span> <text:span text:style-name="T41">What </text:span><text:span text:style-name="T42">D</text:span><text:span text:style-name="T41">efileth a </text:span><text:span text:style-name="T42">M</text:span><text:span text:style-name="T41">an</text:span><text:span text:style-name="T43"> (</text:span><text:span text:style-name="T44">explicit </text:span><text:span text:style-name="T45">&amp; implicit</text:span><text:span text:style-name="T43">)</text:span></text:p>
            <text:p text:style-name="P47">Mat 15:10-20</text:p>
            <text:p text:style-name="P48"/>
            <text:p text:style-name="P48">Peter asks about “this parable” but there are 3 potential phrases in this paragraph <text:span text:style-name="T46">(</text:span><text:span text:style-name="T47">the latter two are likely a response to His disciples </text:span><text:span text:style-name="T48">question </text:span><text:span text:style-name="T47">in v</text:span><text:span text:style-name="T49">12</text:span><text:span text:style-name="T46">)</text:span>:</text:p>
            <text:list xml:id="list1862891157" text:style-name="L4">
              <text:list-item>
                <text:p text:style-name="P49"><text:span text:style-name="T50">#</text:span><text:span text:style-name="T51">8</text:span><text:span text:style-name="T50"> </text:span>What defiles a man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52">Explicitly </text:span><text:span text:style-name="T53">a </text:span><text:span text:style-name="T52">parable because of </text:span><text:span text:style-name="T54">what Peter asks. Implicitly a parable because of</text:span><text:span text:style-name="T52"> </text:span><text:span text:style-name="T55">Mar 7:14,15</text:span>.</text:p>
                  </text:list-item>
                </text:list>
              </text:list-item>
            </text:list>
            <text:list text:continue-list="list1862891157" text:style-name="L4">
              <text:list-item>
                <text:p text:style-name="P51">Every plant that shall be rooted up</text:p>
              </text:list-item>
              <text:list-item>
                <text:p text:style-name="P51"><text:span text:style-name="T56">#</text:span><text:span text:style-name="T16">9</text:span><text:span text:style-name="T56"> </text:span>The blind leading the blind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57">Implicitly</text:span> <text:span text:style-name="T53">a</text:span> parable because of <text:span text:style-name="T1">Luk 6:39</text:span>.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P53"><text:span text:style-name="T58">#</text:span><text:span text:style-name="T59">8</text:span><text:span text:style-name="T58"> </text:span><text:span text:style-name="T41">What </text:span><text:span text:style-name="T42">D</text:span><text:span text:style-name="T41">efileth a </text:span><text:span text:style-name="T42">M</text:span><text:span text:style-name="T41">an</text:span> (explicit)</text:p>
            <text:p text:style-name="P54">Mar 7:14,15</text:p>
            <text:p text:style-name="P55"/>
            <text:p text:style-name="P55">The disciples asked “concerning the parable” <text:span text:style-name="T60">when they were away from the people v</text:span><text:span text:style-name="T61">17</text:span>. <text:span text:style-name="T62">The same explanation is given as in </text:span><text:span text:style-name="T63">Mat 15:17-20</text:span><text:span text:style-name="T62">.</text:span></text:p>
          </table:table-cell>
          <table:table-cell table:style-name="Table1.C2" office:value-type="string">
            <text:p text:style-name="P56"><text:span text:style-name="T58">#</text:span><text:span text:style-name="T59">9</text:span><text:span text:style-name="T58"> </text:span>The Blind Leading the Blind (explicit)</text:p>
            <text:p text:style-name="P57">Luk 6:39</text:p>
            <text:p text:style-name="Table_20_Contents"/>
            <text:p text:style-name="P58">Has other phrases in the same paragraph that may be identified as parables but they are not explicitly called parables anywhere in scripture:</text:p>
            <text:list text:style-name="L7">
              <text:list-item>
                <text:p text:style-name="P59">The mote and the beam</text:p>
              </text:list-item>
              <text:list-item>
                <text:p text:style-name="P60">The good &amp; evil treasure of the heart <text:span text:style-name="T64">(similar to </text:span><text:span text:style-name="T65">Mat 12:35</text:span><text:span text:style-name="T64">)</text:span></text:p>
              </text:list-item>
              <text:list-item>
                <text:p text:style-name="P61">Building on the rock or the earth <text:span text:style-name="T66">(similar to </text:span><text:span text:style-name="T67">Mat 7:24-27</text:span><text:span text:style-name="T66"> except “sand”)</text:span></text:p>
              </text:list-item>
            </text:list>
          </table:table-cell>
        </table:table-row>
        <table:table-row table:style-name="Table1.1">
          <table:table-cell table:style-name="Table1.A11" office:value-type="string">
            <text:p text:style-name="P62">#<text:span text:style-name="T16">10</text:span> Two Sons (explicit; <text:span text:style-name="T1">Mat 21:33a</text:span> “hear another parable”)</text:p>
            <text:p text:style-name="P63">Mat 21:28-3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64">#<text:span text:style-name="T13">1</text:span><text:span text:style-name="T16">1 </text:span>The Stone Which the Builders Rejected (explicit)</text:p>
            <text:p text:style-name="P65">Mat 21:33-44</text:p>
          </table:table-cell>
          <table:table-cell table:style-name="Table1.A2" office:value-type="string">
            <text:p text:style-name="P66">#<text:span text:style-name="T13">1</text:span><text:span text:style-name="T16">1 </text:span>The Stone Which the Builders Rejected (explicit)</text:p>
            <text:p text:style-name="P67">Mar 12:1-11</text:p>
          </table:table-cell>
          <table:table-cell table:style-name="Table1.C2" office:value-type="string">
            <text:p text:style-name="P66">#<text:span text:style-name="T13">1</text:span><text:span text:style-name="T16">1 </text:span>The Stone Which the Builders Rejected (explicit)</text:p>
            <text:p text:style-name="P67">Luk 20:9-18</text:p>
          </table:table-cell>
        </table:table-row>
        <table:table-row table:style-name="Table1.1">
          <table:table-cell table:style-name="Table1.A12" office:value-type="string">
            <text:p text:style-name="P68">#<text:span text:style-name="T13">1</text:span><text:span text:style-name="T16">2</text:span> <text:span text:style-name="T68">Wedding for the King’s Son </text:span><text:span text:style-name="T69">(explicit; v</text:span><text:span text:style-name="T70">1</text:span><text:span text:style-name="T69"> “parable</text:span><text:span text:style-name="T71">s</text:span><text:span text:style-name="T69">”)</text:span></text:p>
            <text:p text:style-name="P69">Mat 22:1-1<text:span text:style-name="T72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0">#<text:span text:style-name="T13">1</text:span><text:span text:style-name="T16">3</text:span> Many Are Called, Few Are Chosen (explicit; v<text:span text:style-name="T1">1</text:span> “parables”)</text:p>
            <text:p text:style-name="P71">Mat 22:14</text:p>
            <text:p text:style-name="Table_20_Contents"/>
            <text:p text:style-name="P72"><text:span text:style-name="T13">Note</text:span>: A very similar phrase appears at the end of <text:span text:style-name="T1">Mat 20:1-16</text:span> which is <text:span text:style-name="T13">not</text:span> <text:span text:style-name="T73">ever </text:span>explicitly called a parable; <text:span text:style-name="T74">the context at the end of </text:span><text:span text:style-name="T75">Mat 19</text:span><text:span text:style-name="T74"> is Jesus speaking to His disciples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12" office:value-type="string">
            <text:p text:style-name="P73">#<text:span text:style-name="T13">1</text:span><text:span text:style-name="T16">4</text:span> The Fig Tree <text:span text:style-name="T76">(explicit)</text:span></text:p>
            <text:p text:style-name="P74">Mat 24:32,33</text:p>
          </table:table-cell>
          <table:table-cell table:style-name="Table1.A2" office:value-type="string">
            <text:p text:style-name="P75"><text:span text:style-name="T77">#</text:span><text:span text:style-name="T78">1</text:span><text:span text:style-name="T16">4</text:span><text:span text:style-name="T77"> </text:span>The Fig Tree <text:span text:style-name="T79">(explicit)</text:span></text:p>
            <text:p text:style-name="P76">Mar 13:28,29</text:p>
          </table:table-cell>
          <table:table-cell table:style-name="Table1.C2" office:value-type="string">
            <text:p text:style-name="P75"><text:span text:style-name="T77">#</text:span><text:span text:style-name="T78">1</text:span><text:span text:style-name="T16">4</text:span><text:span text:style-name="T77"> </text:span>The Fig Tree and All the Trees <text:span text:style-name="T80">(explicit)</text:span></text:p>
            <text:p text:style-name="P76">Luk 21:29-31</text:p>
          </table:table-cell>
        </table:table-row>
        <table:table-row table:style-name="Table1.1">
          <table:table-cell table:style-name="Table1.A16" office:value-type="string">
            <text:p text:style-name="P77">#<text:span text:style-name="T13">19</text:span> The Candle (implicit)</text:p>
            <text:p text:style-name="P78">Mat 5:14-<text:span text:style-name="T81">16</text:span></text:p>
            <text:p text:style-name="Table_20_Contents"/>
            <text:p text:style-name="P79">v<text:span text:style-name="T1">14</text:span>, <text:span text:style-name="T1">16</text:span> are not in <text:span text:style-name="T1">Mar</text:span> or <text:span text:style-name="T1">Luk</text:span></text:p>
          </table:table-cell>
          <table:table-cell table:style-name="Table1.A2" office:value-type="string">
            <text:p text:style-name="P80">#<text:span text:style-name="T13">1</text:span><text:span text:style-name="T16">9</text:span> The Candle (explicit; <text:span text:style-name="T82">Mar 4:33</text:span>)</text:p>
            <text:p text:style-name="P81">Mar 4:21,22</text:p>
          </table:table-cell>
          <table:table-cell table:style-name="Table1.C2" office:value-type="string">
            <text:p text:style-name="P82"><text:span text:style-name="T83">#</text:span><text:span text:style-name="T84">1</text:span><text:span text:style-name="T16">9</text:span><text:span text:style-name="T83"> </text:span>The Candle <text:span text:style-name="T85">(implicit)</text:span></text:p>
            <text:p text:style-name="Table_20_Contents"><text:span text:style-name="T86">Luk 8:16,17</text:span> (<text:span text:style-name="T87">Luk 12:2,</text:span><text:span text:style-name="T88">3</text:span>)</text:p>
            <text:p text:style-name="Table_20_Contents"/>
            <text:p text:style-name="P83">Has other phrases similar to <text:span text:style-name="T1">Mat 6:22,23</text:span> that could be identified as as <text:span text:style-name="T89">a </text:span>parable but <text:span text:style-name="T89">are</text:span> not explicitly called one anywhere in scripture:</text:p>
            <text:list text:style-name="L8">
              <text:list-item>
                <text:p text:style-name="P84">The light of the body is the eye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5">Has the latter part <text:span text:style-name="T90">of </text:span><text:span text:style-name="T91">#</text:span><text:span text:style-name="T92">2</text:span><text:span text:style-name="T16">1</text:span><text:span text:style-name="T91"> The Good Hearer</text:span> but lacks the <text:span text:style-name="T90">first </text:span>part about hearing <text:span text:style-name="T93">(instead, has what appears to be a parable but is not ever called one)</text:span></text:p>
            <text:p text:style-name="P86">Mat 13:12</text:p>
          </table:table-cell>
          <table:table-cell table:style-name="Table1.A2" office:value-type="string">
            <text:p text:style-name="P87">#<text:span text:style-name="T13">2</text:span><text:span text:style-name="T16">1</text:span> The Good Hearer <text:span text:style-name="T85">(explicit; </text:span><text:span text:style-name="T94">Mar 4:33</text:span><text:span text:style-name="T85">)</text:span></text:p>
            <text:p text:style-name="P88">Mar 4:24,25</text:p>
            <text:p text:style-name="Table_20_Contents"/>
            <text:p text:style-name="P89"><text:span text:style-name="T95">Note: </text:span><text:span text:style-name="T96">h</text:span>as an extra phrase:<text:line-break/>“<text:span text:style-name="T97">with what measure ye mete, it shall be measured to you: </text:span><text:span text:style-name="T98">and unto you that hear shall more be given.</text:span>”</text:p>
          </table:table-cell>
          <table:table-cell table:style-name="Table1.C2" office:value-type="string">
            <text:p text:style-name="P90">#<text:span text:style-name="T13">2</text:span><text:span text:style-name="T16">1</text:span> The Good Hearer <text:span text:style-name="T99">(implicit)</text:span></text:p>
            <text:p text:style-name="P88">Luke 8:18</text:p>
            <text:p text:style-name="Table_20_Contents"/>
            <text:p text:style-name="P91"><text:span text:style-name="T95">Note: </text:span><text:span text:style-name="T96">h</text:span>as slightly different wording but it doesn’t appear to be <text:span text:style-name="T100">different </text:span>enough to be an entirely different parable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2">#<text:span text:style-name="T13">2</text:span><text:span text:style-name="T16">2</text:span> <text:span text:style-name="T101">The Blade, Ear, and Corn </text:span><text:span text:style-name="T102">(explicit; </text:span><text:span text:style-name="T103">Mark 4:33</text:span><text:span text:style-name="T102">)</text:span></text:p>
            <text:p text:style-name="P93">Mark 4:26-29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94">#<text:span text:style-name="T13">22</text:span><text:span text:style-name="T14"> </text:span><text:span text:style-name="T104">Garment/Wine Bottles </text:span>(implicit;<text:span text:style-name="T105"> all one parable because of </text:span><text:span text:style-name="T106">Luk 5:36a</text:span>)</text:p>
            <text:p text:style-name="P95">Mat 9:16</text:p>
            <text:p text:style-name="P96">Mat 9:17</text:p>
          </table:table-cell>
          <table:table-cell table:style-name="Table1.A2" office:value-type="string">
            <text:p text:style-name="P97">#<text:span text:style-name="T13">22</text:span> <text:span text:style-name="T1">Mar 2:21,22</text:span> <text:span text:style-name="T107">(implicit;</text:span><text:span text:style-name="T105"> all one parable because of </text:span><text:span text:style-name="T106">Luk 5:36a</text:span><text:span text:style-name="T107">)</text:span></text:p>
          </table:table-cell>
          <table:table-cell table:style-name="Table1.C2" office:value-type="string">
            <text:p text:style-name="P98">#<text:span text:style-name="T13">22</text:span> Garment/Wine Bottles <text:span text:style-name="T105">(explicit; all one parable because of </text:span><text:span text:style-name="T106">Luk 5:36a</text:span><text:span text:style-name="T105">)</text:span></text:p>
            <text:p text:style-name="P99">Luk 5:36</text:p>
            <text:p text:style-name="P100">Luk 5:37-38</text:p>
            <text:p text:style-name="P100">Luk 5:39</text:p>
          </table:table-cell>
        </table:table-row>
        <table:table-row table:style-name="Table1.1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02">#<text:span text:style-name="T13">23</text:span> The Foolish Rich Man (explicit)</text:p>
            <text:p text:style-name="P103">Luk 12:16-21</text:p>
          </table:table-cell>
        </table:table-row>
        <table:table-row table:style-name="Table1.1">
          <table:table-cell table:style-name="Table1.A2" office:value-type="string">
            <text:p text:style-name="P104">#<text:span text:style-name="T13">24</text:span> <text:span text:style-name="T108">The Faithful Steward </text:span><text:span text:style-name="T109">(implicit)</text:span></text:p>
            <text:p text:style-name="P105">Mat 24:4<text:span text:style-name="T110">5</text:span>-51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06">#<text:span text:style-name="T13">24</text:span> <text:span text:style-name="T108">The Faithful </text:span><text:span text:style-name="T111">&amp; Wise </text:span><text:span text:style-name="T108">Steward/</text:span><text:span text:style-name="T111">Servant</text:span><text:span text:style-name="T108"> (</text:span><text:span text:style-name="T112">explicit</text:span><text:span text:style-name="T108">; Peter calls one of the </text:span><text:span text:style-name="T113">3 figurative phrases</text:span><text:span text:style-name="T108"> in the previous paragraph </text:span><text:span text:style-name="T114">v</text:span><text:span text:style-name="T115">22</text:span><text:span text:style-name="T114">-</text:span><text:span text:style-name="T115">40</text:span><text:span text:style-name="T108"> a parable and based on Jesus’ response it was the one immediately preceding Peter’s question)</text:span></text:p>
            <text:p text:style-name="P107">Luk 12:<text:span text:style-name="T110">36</text:span>-4<text:span text:style-name="T110">0</text:span></text:p>
            <text:p text:style-name="Table_20_Contents"/>
            <text:p text:style-name="P108">Other <text:span text:style-name="T116">figurative </text:span>phrases in <text:span text:style-name="T1">Luk 12:22-40</text:span> that <text:span text:style-name="T116">Peter </text:span>could <text:span text:style-name="T116">have been referring to</text:span>:</text:p>
            <text:list text:style-name="L9">
              <text:list-item>
                <text:p text:style-name="P109">The Ravens</text:p>
              </text:list-item>
              <text:list-item>
                <text:p text:style-name="P109">The Lilies/grass</text:p>
              </text:list-item>
              <text:list-item>
                <text:p text:style-name="P109">Bags/treasure</text:p>
              </text:list-item>
              <text:list-item>
                <text:p text:style-name="P110"><text:span text:style-name="T117">Girded loins/</text:span>Lights burning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1">#<text:span text:style-name="T13">25</text:span> The Unfruitful Fig Tree (explicit)</text:p>
            <text:p text:style-name="P112">Luk 13:6-9</text:p>
          </table:table-cell>
        </table:table-row>
        <table:table-row table:style-name="Table1.1">
          <table:table-cell table:style-name="Table1.A2" office:value-type="string">
            <text:p text:style-name="P113">Mat 23:12</text:p>
            <text:p text:style-name="P114"><text:span text:style-name="T118">H</text:span><text:span text:style-name="T119">as a v</text:span>ery similar phrase to the end of #<text:span text:style-name="T13">26</text:span> (v<text:span text:style-name="T1">11</text:span>) <text:span text:style-name="T120">but does not contain the preceding parable.</text:span>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5">#<text:span text:style-name="T13">26</text:span> <text:span text:style-name="T121">Where to Sit at a Wedding (explicit)</text:span></text:p>
            <text:p text:style-name="P116">Luk 14:7-11</text:p>
            <text:p text:style-name="Table_20_Contents"><text:span text:style-name="T122">Luk 14:12-14</text:span> <text:span text:style-name="T123">(not a parable)</text:span></text:p>
          </table:table-cell>
        </table:table-row>
        <table:table-row table:style-name="Table1.1">
          <table:table-cell table:style-name="Table1.A2" office:value-type="string">
            <text:p text:style-name="P117">#<text:span text:style-name="T13">27</text:span> <text:span text:style-name="T1">Mat 18:12,13</text:span> (implicit; does not have The Lost Coin)</text:p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18">#<text:span text:style-name="T13">27</text:span> The 99 &amp; 1 sheep and <text:span text:style-name="T124">T</text:span>he Lost Coin (explicit; <text:span text:style-name="T125">these are both part of the same paragraph that begins with “And he spake this parable” singular)</text:span></text:p>
            <text:p text:style-name="P119">Luk 15:3-7</text:p>
            <text:p text:style-name="P119">Luk 15:8-<text:span text:style-name="T126">10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" office:value-type="string">
            <text:p text:style-name="P120">#<text:span text:style-name="T13">28</text:span> The Unjust Judge (explicit)</text:p>
            <text:p text:style-name="P121">Luk 18:1-8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6" office:value-type="string">
            <text:p text:style-name="Table_20_Contents"/>
          </table:table-cell>
          <table:table-cell table:style-name="Table1.C2" office:value-type="string">
            <text:p text:style-name="P122">#<text:span text:style-name="T13">29</text:span> The Pharisee &amp; the Publican (explicit)</text:p>
            <text:p text:style-name="P123">Luk 18:9-14</text:p>
            <text:p text:style-name="P122"/>
            <text:p text:style-name="Table_20_Contents"><text:span text:style-name="T127">Note: this one ends </text:span><text:span text:style-name="T128">almost </text:span><text:span text:style-name="T127">exactly the same as #</text:span><text:span text:style-name="T129">26</text:span> <text:span text:style-name="T130">(the only difference being “every one/whosoever”)</text:span></text:p>
          </table:table-cell>
        </table:table-row>
        <table:table-row table:style-name="Table1.1">
          <table:table-cell table:style-name="Table1.A2" office:value-type="string">
            <text:p text:style-name="P124">Mat 25:14-30</text:p>
            <text:p text:style-name="P125">Similar to #<text:span text:style-name="T13">30</text:span> The Nobleman but not close enough to be the same parable.</text:p>
          </table:table-cell>
          <table:table-cell table:style-name="Table1.B27" office:value-type="string">
            <text:p text:style-name="Table_20_Contents"/>
          </table:table-cell>
          <table:table-cell table:style-name="Table1.C2" office:value-type="string">
            <text:p text:style-name="P126">#<text:span text:style-name="T13">30</text:span> The Nobleman (explicit)</text:p>
            <text:p text:style-name="P127">Luk 19:11-27</text:p>
            <text:p text:style-name="Table_20_Contents"/>
            <text:p text:style-name="P128">Note: v<text:span text:style-name="T1">26</text:span> is almost the same as #<text:span text:style-name="T13">21</text:span> The Good Hearer</text:p>
          </table:table-cell>
        </table:table-row>
        <table:table-row table:style-name="Table1.1">
          <table:table-cell table:style-name="Table1.A28" table:number-columns-spanned="3" office:value-type="string">
            <text:p text:style-name="P129">John</text:p>
          </table:table-cell>
          <table:covered-table-cell/>
          <table:covered-table-cell/>
        </table:table-row>
        <table:table-row table:style-name="Table1.1">
          <table:table-cell table:style-name="Table1.A29" table:number-columns-spanned="3" office:value-type="string">
            <text:p text:style-name="P130">#<text:span text:style-name="T13">31</text:span> The Good Shepherd <text:span text:style-name="T131">(explicit)</text:span></text:p>
            <text:p text:style-name="P131">John 10:1-16</text:p>
          </table:table-cell>
          <table:covered-table-cell/>
          <table:covered-table-cell/>
        </table:table-row>
      </table:table>
      <text:p text:style-name="P132"><text:soft-page-break/><text:span text:style-name="T132">N</text:span>otes:</text:p>
      <text:list text:style-name="L10">
        <text:list-item>
          <text:p text:style-name="P133"><text:span text:style-name="T133">Mat 20:1-16</text:span><text:span text:style-name="T134"> (The householder that went out early in the morning to hire labourers for his vineyard) is not ever explicitly called a parable. It does begin with “</text:span><text:span text:style-name="T135">For the kingdom of heaven is like</text:span><text:span text:style-name="T134">” and it does end with a verse that is explicitly called a parable elsewhere (v</text:span><text:span text:style-name="T133">16</text:span>, #<text:span text:style-name="T13">13</text:span> Many Are Called, Few Are Chosen, <text:span text:style-name="T136">Mat 22:14</text:span><text:span text:style-name="T134">). </text:span><text:span text:style-name="T137">But, because it is not an explicit or implicit parable it was not counted for this list.</text:span></text:p>
        </text:list-item>
        <text:list-item>
          <text:p text:style-name="P134"><text:span text:style-name="T138">Mat 13:52</text:span><text:span text:style-name="T139"> “Then said he unto them, </text:span><text:span text:style-name="T140">Therefore every scribe which is instructed unto the kingdom of heaven is like unto a man that is an householder, which bringeth forth out of his treasure things new and old.</text:span><text:span text:style-name="T139">” follows the same similar pattern as other parables but it is not counted for the same reason (it is not ever explicitly or implicitly called a parable).</text:span></text:p>
        </text:list-item>
        <text:list-item>
          <text:p text:style-name="P135"><text:span text:style-name="T1">Mat 11:16-19</text:span> (not included <text:span text:style-name="T141">although it is a figurative comparison</text:span>)</text:p>
        </text:list-item>
        <text:list-item>
          <text:p text:style-name="P136"><text:span text:style-name="T1">Mat 25:14-30</text:span> “The Unprofitable Servant” looks a lot like a parable but it is not ever called one.</text:p>
        </text:list-item>
        <text:list-item>
          <text:p text:style-name="P136"><text:span text:style-name="T1">Luke 14:27</text:span> <text:span text:style-name="T142">is obviously figurative, but it is not ever called a parable.</text:span></text:p>
          <text:list>
            <text:list-item>
              <text:p text:style-name="P137">Likewise <text:span text:style-name="T1">Mat 5:13</text:span>, <text:span text:style-name="T1">Mar 9:50</text:span>, &amp; <text:span text:style-name="T1">Luke 14:34</text:span>.</text:p>
            </text:list-item>
          </text:list>
        </text:list-item>
        <text:list-item>
          <text:p text:style-name="P138">Much of Jesus’ speech is rife with figurative speech <text:span text:style-name="T143">and comparisons</text:span> that could be considered parables (more than 40 before even getting to The Sower in Matthew alone). But, again, if it isn’t explicitly or implicitly called a parable it is not on this list.</text:p>
        </text:list-item>
        <text:list-item>
          <text:p text:style-name="P139">There are three Strong’s numbers associated with the word “parable” in the Bible. Here they are listed with the first time each one appears <text:span text:style-name="T144">and </text:span><text:span text:style-name="T145">with </text:span><text:span text:style-name="T144">all </text:span><text:span text:style-name="T145">the words they are translated to</text:span>:</text:p>
          <text:list>
            <text:list-item>
              <text:p text:style-name="P139">H4912 (<text:span text:style-name="T1">Num 23:7</text:span>) - מָשָׁל (mâshâl | maw-shawl') – <text:span text:style-name="T146">byword, like, parable, proverb</text:span></text:p>
            </text:list-item>
            <text:list-item>
              <text:p text:style-name="P140">G3850 (<text:span text:style-name="T1">Mat 13:3</text:span>) - παραβολή (parabolḗ | par-ab-ol-ay') – <text:span text:style-name="T147">comparison, figure, parable, proverb</text:span></text:p>
            </text:list-item>
            <text:list-item>
              <text:p text:style-name="P141">G3942 (<text:span text:style-name="T1">Joh 10:6</text:span>) - παροιμία (paroimía | par-oy-mee'-ah) – <text:span text:style-name="T147">parable, proverb</text:span></text:p>
            </text:list-item>
          </text:list>
        </text:list-item>
      </text:list>
      <text:p text:style-name="P142"/>
      <text:p text:style-name="P143">Grand total unique parables: 31</text:p>
      <text:p text:style-name="P143">Grand total all parables: <text:span text:style-name="T148">5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09:16:36.131271100</meta:creation-date>
    <dc:title>Notes on the parables of Jesus</dc:title>
    <meta:editing-duration>PT16H5M7S</meta:editing-duration>
    <meta:editing-cycles>277</meta:editing-cycles>
    <meta:generator>LibreOffice/26.2.4.2$Linux_X86_64 LibreOffice_project/64a984c51f4702dbd3710b13428c673a2f1292e7</meta:generator>
    <meta:initial-creator>William K. McDannell Jr.</meta:initial-creator>
    <dc:date>2026-07-11T12:20:09.950070878</dc:date>
    <meta:print-date>2025-12-06T13:45:23.691098400</meta:print-date>
    <meta:printed-by>PDF files: William K. McDannell Jr.</meta:printed-by>
    <meta:document-statistic meta:table-count="3" meta:image-count="0" meta:object-count="0" meta:page-count="4" meta:paragraph-count="183" meta:word-count="1464" meta:character-count="8190" meta:non-whitespace-character-count="6937"/>
    <meta:template xlink:type="simple" xlink:actuate="onRequest" xlink:title="default" xlink:href="../../../../AppData/Roaming/LibreOffice/4/user/template/default.ott" meta:date="2025-12-02T09:16:35.678696400"/>
  </office:meta>
</office:document-meta>
</file>