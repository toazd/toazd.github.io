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E000002AF086254D0.png" manifest:media-type="image/png"/>
  <manifest:file-entry manifest:full-path="Pictures/100000010000033C0000039E3EE655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11.3153in" fo:margin-left="0in" fo:break-before="page" table:align="left" style:may-break-between-rows="true" table:border-model="collapsing"/>
    </style:style>
    <style:style style:name="Table13.A" style:family="table-column">
      <style:table-column-properties style:column-width="2.5in"/>
    </style:style>
    <style:style style:name="Table13.B" style:family="table-column">
      <style:table-column-properties style:column-width="2.6222in"/>
    </style:style>
    <style:style style:name="Table13.C" style:family="table-column">
      <style:table-column-properties style:column-width="4.2528in"/>
    </style:style>
    <style:style style:name="Table13.D" style:family="table-column">
      <style:table-column-properties style:column-width="1.9403in"/>
    </style:style>
    <style:style style:name="Table13.1" style:family="table-row">
      <style:table-row-properties style:min-row-height="0.2472in" fo:keep-together="auto"/>
    </style:style>
    <style:style style:name="Table13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424a3" officeooo:paragraph-rsid="003424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41c2a" officeooo:paragraph-rsid="00441c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2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3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7ba" officeooo:paragraph-rsid="0045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2bb9" officeooo:paragraph-rsid="00482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c1ce" officeooo:paragraph-rsid="0048c1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7ea7" officeooo:paragraph-rsid="00497e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b1b87" officeooo:paragraph-rsid="004b1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cf3f9" officeooo:paragraph-rsid="004cf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da4c2" officeooo:paragraph-rsid="004da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123b" officeooo:paragraph-rsid="004e1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d545" officeooo:paragraph-rsid="004ed54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0db15" officeooo:paragraph-rsid="0050d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5e19" officeooo:paragraph-rsid="00515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ffd1" officeooo:paragraph-rsid="0051ff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ffd1" officeooo:paragraph-rsid="0051ff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4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6609" officeooo:paragraph-rsid="00536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6609" officeooo:paragraph-rsid="00536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d2d8" officeooo:paragraph-rsid="0053d2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4f7" officeooo:paragraph-rsid="005544f7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5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1bac" officeooo:paragraph-rsid="00561bac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1bac" officeooo:paragraph-rsid="00561bac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1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9f36" officeooo:paragraph-rsid="00569f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7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list-style-name="L8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L9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 style:list-style-name="L6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style:font-name="Liberation Sans"/>
    </style:style>
    <style:style style:name="P39" style:family="paragraph" style:parent-style-name="Standard">
      <style:text-properties style:font-name="Liberation Sans" officeooo:paragraph-rsid="00341bc2"/>
    </style:style>
    <style:style style:name="P40" style:family="paragraph" style:parent-style-name="Standard">
      <style:paragraph-properties fo:break-before="page"/>
      <style:text-properties style:font-name="Liberation Sans" officeooo:paragraph-rsid="00341bc2"/>
    </style:style>
    <style:style style:name="T1" style:family="text">
      <style:text-properties officeooo:rsid="00441c2a"/>
    </style:style>
    <style:style style:name="T2" style:family="text">
      <style:text-properties officeooo:rsid="00474304"/>
    </style:style>
    <style:style style:name="T3" style:family="text">
      <style:text-properties officeooo:rsid="0058f0fd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">1Sam - 2<text:span text:style-name="T1">Kin</text:span></text:p>
          </table:table-cell>
          <table:table-cell table:style-name="Table13.A1" office:value-type="string">
            <text:p text:style-name="P2">1Chr</text:p>
          </table:table-cell>
          <table:table-cell table:style-name="Table13.A1" office:value-type="string">
            <text:p text:style-name="P3">Matthew 1</text:p>
          </table:table-cell>
          <table:table-cell table:style-name="Table13.A1" office:value-type="string">
            <text:p text:style-name="P3">Luke 3</text:p>
          </table:table-cell>
        </table:table-row>
        <table:table-row table:style-name="Table13.2">
          <table:table-cell table:style-name="Table13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list xml:id="list429917282" text:style-name="L1">
              <text:list-item>
                <text:p text:style-name="P5">David</text:p>
              </text:list-item>
              <text:list-item>
                <text:p text:style-name="P6">Solomon/Jedidiah</text:p>
              </text:list-item>
              <text:list-item>
                <text:p text:style-name="P6">Rehoboam/Roboam</text:p>
              </text:list-item>
              <text:list-item>
                <text:p text:style-name="P6">Abijam/Abijah/Abia</text:p>
              </text:list-item>
              <text:list-item>
                <text:p text:style-name="P6">Asa</text:p>
              </text:list-item>
              <text:list-item>
                <text:p text:style-name="P6">Jeoshaphat/Josaphat</text:p>
              </text:list-item>
              <text:list-item>
                <text:p text:style-name="P6">Jehoram/Joram</text:p>
              </text:list-item>
            </text:list>
            <text:list text:style-name="L2">
              <text:list-item>
                <text:p text:style-name="P7">Ahaziah/Jehoahaz/Azariah</text:p>
              </text:list-item>
              <text:list-item>
                <text:p text:style-name="P7">Joash/Jehoash</text:p>
              </text:list-item>
              <text:list-item>
                <text:p text:style-name="P7">Amaziah</text:p>
              </text:list-item>
            </text:list>
            <text:list xml:id="list123103497746377" text:continue-list="list429917282" text:style-name="L1">
              <text:list-item>
                <text:p text:style-name="P6">Azariah/Uzziah/Ozias</text:p>
              </text:list-item>
              <text:list-item>
                <text:p text:style-name="P6">Jotham/Joatham</text:p>
              </text:list-item>
              <text:list-item>
                <text:p text:style-name="P6">Ahaz/Achaz</text:p>
              </text:list-item>
              <text:list-item>
                <text:p text:style-name="P6">Hezekiah/Ezekias</text:p>
              </text:list-item>
              <text:list-item>
                <text:p text:style-name="P6">Manasseh/Manasses</text:p>
              </text:list-item>
              <text:list-item>
                <text:p text:style-name="P6">Amon</text:p>
              </text:list-item>
            </text:list>
            <text:list text:style-name="L3">
              <text:list-item>
                <text:p text:style-name="P8">Josiah/Josias</text:p>
              </text:list-item>
              <text:list-item>
                <text:p text:style-name="P8">Eliakim/Jehoiakim</text:p>
              </text:list-item>
            </text:list>
            <text:list text:continue-list="list123103497746377" text:style-name="L1">
              <text:list-item>
                <text:p text:style-name="P9">Jehoiachin/Jeconiah/Coniah/Jechonias</text:p>
              </text:list-item>
            </text:list>
          </table:table-cell>
          <table:table-cell table:style-name="Table13.B2" office:value-type="string">
            <text:list xml:id="list123102858744359" text:continue-numbering="true" text:style-name="L1">
              <text:list-item text:start-value="1">
                <text:p text:style-name="P10">Abraham (1:27,28)</text:p>
              </text:list-item>
              <text:list-item>
                <text:p text:style-name="P11">Isaac (1:18,<text:span text:style-name="T2">34</text:span>)</text:p>
              </text:list-item>
              <text:list-item>
                <text:p text:style-name="P12">Israel/Jacob (1:34)</text:p>
              </text:list-item>
              <text:list-item>
                <text:p text:style-name="P13">Judah (2:1,<text:span text:style-name="T3">4:1</text:span>)</text:p>
              </text:list-item>
              <text:list-item>
                <text:p text:style-name="P14">Pharez (2:4,<text:span text:style-name="T3">4:1</text:span>)</text:p>
              </text:list-item>
              <text:list-item>
                <text:p text:style-name="P14">Hezron (2:5)</text:p>
              </text:list-item>
              <text:list-item>
                <text:p text:style-name="P15">Ram (2:9)</text:p>
              </text:list-item>
              <text:list-item>
                <text:p text:style-name="P16">Amminadab (2:10)</text:p>
              </text:list-item>
              <text:list-item>
                <text:p text:style-name="P17">Nahshon (2:10)</text:p>
              </text:list-item>
              <text:list-item>
                <text:p text:style-name="P18">Salma (2:11)</text:p>
              </text:list-item>
              <text:list-item>
                <text:p text:style-name="P18">Boaz (2:12)</text:p>
              </text:list-item>
              <text:list-item>
                <text:p text:style-name="P18">Obed (2:12)</text:p>
              </text:list-item>
              <text:list-item>
                <text:p text:style-name="P18">Jesse (2:12)</text:p>
              </text:list-item>
              <text:list-item>
                <text:p text:style-name="P19">David (7<text:span text:style-name="T4">th</text:span>) (2:15)</text:p>
              </text:list-item>
              <text:list-item>
                <text:p text:style-name="P20">Nathan &amp; Solomon (3:5)</text:p>
              </text:list-item>
              <text:list-item>
                <text:p text:style-name="P21">Rehoboam (3:10)</text:p>
              </text:list-item>
              <text:list-item>
                <text:p text:style-name="P21">Abia (3:10)</text:p>
              </text:list-item>
              <text:list-item>
                <text:p text:style-name="P21">Asa (3:10)</text:p>
              </text:list-item>
              <text:list-item>
                <text:p text:style-name="P21">Jehoshaphat (3:10)</text:p>
              </text:list-item>
              <text:list-item>
                <text:p text:style-name="P22">Joram (3:11)</text:p>
              </text:list-item>
            </text:list>
            <text:list text:style-name="L4">
              <text:list-item>
                <text:p text:style-name="P23">Ahaziah (3:11)</text:p>
              </text:list-item>
              <text:list-item>
                <text:p text:style-name="P23">Joash (3:11)</text:p>
              </text:list-item>
              <text:list-item>
                <text:p text:style-name="P24">Amaziah (3:12)</text:p>
              </text:list-item>
            </text:list>
            <text:list xml:id="list123103220115644" text:continue-list="list123102858744359" text:style-name="L1">
              <text:list-item>
                <text:p text:style-name="P25">Azariah (3:12)</text:p>
              </text:list-item>
              <text:list-item>
                <text:p text:style-name="P25">Jotham (3:12)</text:p>
              </text:list-item>
              <text:list-item>
                <text:p text:style-name="P26">Ahaz (3:13)</text:p>
              </text:list-item>
              <text:list-item>
                <text:p text:style-name="P26">Hezekiah (3:13)</text:p>
              </text:list-item>
              <text:list-item>
                <text:p text:style-name="P26">Manasseh (3:13)</text:p>
              </text:list-item>
              <text:list-item>
                <text:p text:style-name="P27">Amon (3:14)</text:p>
              </text:list-item>
            </text:list>
            <text:list text:style-name="L5">
              <text:list-item>
                <text:p text:style-name="P28">Josiah (3:14)</text:p>
              </text:list-item>
              <text:list-item>
                <text:p text:style-name="P29">Jehoiakim (3:15)</text:p>
              </text:list-item>
            </text:list>
            <text:list text:continue-list="list123103220115644" text:style-name="L1">
              <text:list-item>
                <text:p text:style-name="P30">Jeconiah (3:16)</text:p>
              </text:list-item>
              <text:list-item>
                <text:p text:style-name="P31">Salathiel (3:17)</text:p>
              </text:list-item>
            </text:list>
          </table:table-cell>
          <table:table-cell table:style-name="Table13.C2" office:value-type="string">
            <text:list xml:id="list2496228165" text:style-name="L6">
              <text:list-item>
                <text:p text:style-name="P32">Abraham</text:p>
              </text:list-item>
              <text:list-item>
                <text:p text:style-name="P33">Isaac</text:p>
              </text:list-item>
              <text:list-item>
                <text:p text:style-name="P33">Jacob</text:p>
              </text:list-item>
              <text:list-item>
                <text:p text:style-name="P33">Judas (Judah) Gen 46:12</text:p>
              </text:list-item>
              <text:list-item>
                <text:p text:style-name="P33">Phares (Pharez) Gen 46:12</text:p>
              </text:list-item>
              <text:list-item>
                <text:p text:style-name="P33">Hezron/Esrom</text:p>
              </text:list-item>
              <text:list-item>
                <text:p text:style-name="P33">Ram/Aram</text:p>
              </text:list-item>
              <text:list-item>
                <text:p text:style-name="P33">Amminadab/Aminadab</text:p>
              </text:list-item>
              <text:list-item>
                <text:p text:style-name="P33">Nahshon/Naasson</text:p>
              </text:list-item>
              <text:list-item>
                <text:p text:style-name="P33">Salmon</text:p>
              </text:list-item>
              <text:list-item>
                <text:p text:style-name="P33">Boaz/Booz</text:p>
              </text:list-item>
              <text:list-item>
                <text:p text:style-name="P33">Obed</text:p>
              </text:list-item>
              <text:list-item>
                <text:p text:style-name="P33">Jesse</text:p>
              </text:list-item>
              <text:list-item>
                <text:p text:style-name="P32">David 1Ch 3</text:p>
              </text:list-item>
              <text:list-item>
                <text:p text:style-name="P33">Solomon</text:p>
              </text:list-item>
              <text:list-item>
                <text:p text:style-name="P33">Rehoboam</text:p>
              </text:list-item>
              <text:list-item>
                <text:p text:style-name="P33">Abia</text:p>
              </text:list-item>
              <text:list-item>
                <text:p text:style-name="P33">Asa</text:p>
              </text:list-item>
              <text:list-item>
                <text:p text:style-name="P33">Josaphat (Jehoshaphat 1Ki 15:24)</text:p>
              </text:list-item>
              <text:list-item>
                <text:p text:style-name="P33">Joram (Jehoram 2Ki 8:16)</text:p>
              </text:list-item>
            </text:list>
            <text:list text:style-name="L7">
              <text:list-item>
                <text:p text:style-name="P34">Ahaziah (Azariah/Jehoahaz)</text:p>
              </text:list-item>
              <text:list-item>
                <text:p text:style-name="P34">Joash (Jehoash)</text:p>
              </text:list-item>
              <text:list-item>
                <text:p text:style-name="P34">Amaziah</text:p>
              </text:list-item>
            </text:list>
            <text:list xml:id="list123103373379112" text:continue-list="list2496228165" text:style-name="L6">
              <text:list-item>
                <text:p text:style-name="P33">Ozias (Azariah/Uzziah)</text:p>
              </text:list-item>
              <text:list-item>
                <text:p text:style-name="P33">Joatham (Jotham)</text:p>
              </text:list-item>
              <text:list-item>
                <text:p text:style-name="P33">Achaz</text:p>
              </text:list-item>
              <text:list-item>
                <text:p text:style-name="P33">Ezekias (Hezekiah)</text:p>
              </text:list-item>
              <text:list-item>
                <text:p text:style-name="P33">Manasses (Manasseh)</text:p>
              </text:list-item>
              <text:list-item>
                <text:p text:style-name="P33">Amon</text:p>
              </text:list-item>
            </text:list>
            <text:list text:style-name="L8">
              <text:list-item>
                <text:p text:style-name="P35">Josias (Josiah) Mat 1:11</text:p>
              </text:list-item>
            </text:list>
            <text:list text:style-name="L9">
              <text:list-item>
                <text:p text:style-name="P36">Eliakim / Jehoiakim (2Ki 23:34, 24:8)</text:p>
              </text:list-item>
            </text:list>
            <text:list text:continue-list="list123103373379112" text:style-name="L6">
              <text:list-item>
                <text:p text:style-name="P37">Jechonias (Jehoichin/Jeconiah/Coniah) H3204</text:p>
              </text:list-item>
              <text:list-item>
                <text:p text:style-name="P33">Salathiel (Shealtiel)</text:p>
              </text:list-item>
              <text:list-item>
                <text:p text:style-name="P33">Zorobabel (Zerubbabel) Ezr 3:2</text:p>
              </text:list-item>
              <text:list-item>
                <text:p text:style-name="P33">Abiud</text:p>
              </text:list-item>
              <text:list-item>
                <text:p text:style-name="P33">Eliakim</text:p>
              </text:list-item>
              <text:list-item>
                <text:p text:style-name="P33">Azor</text:p>
              </text:list-item>
              <text:list-item>
                <text:p text:style-name="P33">Sadoc</text:p>
              </text:list-item>
              <text:list-item>
                <text:p text:style-name="P33">Achim</text:p>
              </text:list-item>
              <text:list-item>
                <text:p text:style-name="P33">Eliud</text:p>
              </text:list-item>
              <text:list-item>
                <text:p text:style-name="P33">Eleazar</text:p>
              </text:list-item>
              <text:list-item>
                <text:p text:style-name="P33">Matthan</text:p>
              </text:list-item>
              <text:list-item>
                <text:p text:style-name="P33">Jacob</text:p>
              </text:list-item>
              <text:list-item>
                <text:p text:style-name="P33">Joseph</text:p>
              </text:list-item>
              <text:list-item>
                <text:p text:style-name="P32">Jesus</text:p>
              </text:list-item>
            </text:list>
            <text:p text:style-name="P4"/>
          </table:table-cell>
          <table:table-cell table:style-name="Table13.D2" office:value-type="string">
            <text:list text:continue-numbering="true" text:style-name="L6">
              <text:list-item text:start-value="1">
                <text:p text:style-name="P32">Abraham</text:p>
              </text:list-item>
              <text:list-item>
                <text:p text:style-name="P33">Isaac</text:p>
              </text:list-item>
              <text:list-item>
                <text:p text:style-name="P33">Jacob</text:p>
              </text:list-item>
              <text:list-item>
                <text:p text:style-name="P33">Juda/Judah</text:p>
              </text:list-item>
              <text:list-item>
                <text:p text:style-name="P33">Phares</text:p>
              </text:list-item>
              <text:list-item>
                <text:p text:style-name="P33">Esrom</text:p>
              </text:list-item>
              <text:list-item>
                <text:p text:style-name="P33">Aram</text:p>
              </text:list-item>
              <text:list-item>
                <text:p text:style-name="P33">Aminadab</text:p>
              </text:list-item>
              <text:list-item>
                <text:p text:style-name="P33">Naasson</text:p>
              </text:list-item>
              <text:list-item>
                <text:p text:style-name="P33">Salmon</text:p>
              </text:list-item>
              <text:list-item>
                <text:p text:style-name="P33">Booz</text:p>
              </text:list-item>
              <text:list-item>
                <text:p text:style-name="P33">Obed</text:p>
              </text:list-item>
              <text:list-item>
                <text:p text:style-name="P33">Jesse</text:p>
              </text:list-item>
              <text:list-item>
                <text:p text:style-name="P32">David</text:p>
              </text:list-item>
              <text:list-item>
                <text:p text:style-name="P33">Nathan</text:p>
              </text:list-item>
              <text:list-item>
                <text:p text:style-name="P33">Mattatha</text:p>
              </text:list-item>
              <text:list-item>
                <text:p text:style-name="P33">Menan</text:p>
              </text:list-item>
              <text:list-item>
                <text:p text:style-name="P33">Melea</text:p>
              </text:list-item>
              <text:list-item>
                <text:p text:style-name="P33">Eliakim</text:p>
              </text:list-item>
              <text:list-item>
                <text:p text:style-name="P33">Jonan</text:p>
              </text:list-item>
              <text:list-item>
                <text:p text:style-name="P33">Joseph</text:p>
              </text:list-item>
              <text:list-item>
                <text:p text:style-name="P33">Juda</text:p>
              </text:list-item>
              <text:list-item>
                <text:p text:style-name="P33">Simeon</text:p>
              </text:list-item>
              <text:list-item>
                <text:p text:style-name="P33">Levi</text:p>
              </text:list-item>
              <text:list-item>
                <text:p text:style-name="P33">Matthat</text:p>
              </text:list-item>
              <text:list-item>
                <text:p text:style-name="P33">Jorim</text:p>
              </text:list-item>
              <text:list-item>
                <text:p text:style-name="P37">Eliezer</text:p>
              </text:list-item>
              <text:list-item>
                <text:p text:style-name="P37">Jose</text:p>
              </text:list-item>
              <text:list-item>
                <text:p text:style-name="P37">Er</text:p>
              </text:list-item>
              <text:list-item>
                <text:p text:style-name="P37">Elmodam</text:p>
              </text:list-item>
              <text:list-item>
                <text:p text:style-name="P37">Cosam</text:p>
              </text:list-item>
              <text:list-item>
                <text:p text:style-name="P37">Addi</text:p>
              </text:list-item>
              <text:list-item>
                <text:p text:style-name="P37">Melchi</text:p>
              </text:list-item>
              <text:list-item>
                <text:p text:style-name="P37">Neri</text:p>
              </text:list-item>
              <text:list-item>
                <text:p text:style-name="P37">Salathiel</text:p>
              </text:list-item>
              <text:list-item>
                <text:p text:style-name="P37">Zorobabel</text:p>
              </text:list-item>
              <text:list-item>
                <text:p text:style-name="P37">Rhesa</text:p>
              </text:list-item>
              <text:list-item>
                <text:p text:style-name="P37">Joanna</text:p>
              </text:list-item>
              <text:list-item>
                <text:p text:style-name="P37">Juda</text:p>
              </text:list-item>
              <text:list-item>
                <text:p text:style-name="P37">Joseph</text:p>
              </text:list-item>
              <text:list-item>
                <text:p text:style-name="P37">Semei</text:p>
              </text:list-item>
              <text:list-item>
                <text:p text:style-name="P33">Mattathias</text:p>
              </text:list-item>
              <text:list-item>
                <text:p text:style-name="P33">Maath</text:p>
              </text:list-item>
              <text:list-item>
                <text:p text:style-name="P33">Nagge</text:p>
              </text:list-item>
              <text:list-item>
                <text:p text:style-name="P33">Esli</text:p>
              </text:list-item>
              <text:list-item>
                <text:p text:style-name="P33">Naum</text:p>
              </text:list-item>
              <text:list-item>
                <text:p text:style-name="P33">Amos</text:p>
              </text:list-item>
              <text:list-item>
                <text:p text:style-name="P33">Mattathias</text:p>
              </text:list-item>
              <text:list-item>
                <text:p text:style-name="P33">Joseph</text:p>
              </text:list-item>
              <text:list-item>
                <text:p text:style-name="P33">Janna</text:p>
              </text:list-item>
              <text:list-item>
                <text:p text:style-name="P33">Melchi</text:p>
              </text:list-item>
              <text:list-item>
                <text:p text:style-name="P33">Heli</text:p>
              </text:list-item>
              <text:list-item>
                <text:p text:style-name="P33">Joseph</text:p>
              </text:list-item>
              <text:list-item>
                <text:p text:style-name="P32">Jesus</text:p>
              </text:list-item>
            </text:list>
          </table:table-cell>
        </table:table-row>
      </table:table>
      <text:p text:style-name="P38"/>
      <text:p text:style-name="P39"/>
      <text:p text:style-name="P40"><draw:frame draw:style-name="fr1" draw:name="Image1" text:anchor-type="char" svg:y="3.0189in" svg:width="8.1in" svg:height="9.0583in" draw:z-index="1"><draw:image xlink:href="Pictures/100000010000033C0000039E3EE6554F.png" xlink:type="simple" xlink:show="embed" xlink:actuate="onLoad" draw:mime-type="image/png"/></draw:frame></text:p>
      <text:p text:style-name="P40"><draw:frame draw:style-name="fr1" draw:name="Image2" text:anchor-type="char" svg:y="5.0839in" svg:width="5.1492in" svg:height="7.161in" draw:z-index="0"><draw:image xlink:href="Pictures/10000001000001EE000002AF086254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2T16:08:01.413000000</meta:creation-date>
    <dc:date>2026-07-11T12:31:01.489900600</dc:date>
    <meta:editing-duration>PT3H47M2S</meta:editing-duration>
    <meta:editing-cycles>78</meta:editing-cycles>
    <meta:generator>LibreOffice/26.2.4.2$Linux_X86_64 LibreOffice_project/64a984c51f4702dbd3710b13428c673a2f1292e7</meta:generator>
    <meta:print-date>2024-12-22T15:58:10.677000000</meta:print-date>
    <meta:printed-by>PDF files</meta:printed-by>
    <meta:document-statistic meta:table-count="1" meta:image-count="2" meta:object-count="0" meta:page-count="3" meta:paragraph-count="155" meta:word-count="380" meta:character-count="2046" meta:non-whitespace-character-count="1972"/>
  </office:meta>
</office:document-meta>
</file>