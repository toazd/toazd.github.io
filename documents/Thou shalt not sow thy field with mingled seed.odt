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9377" officeooo:paragraph-rsid="00149377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127622" loext:opacity="100%" officeooo:rsid="00143e1f" officeooo:paragraph-rsid="00143e1f"/>
    </style:style>
    <style:style style:name="P4" style:family="paragraph" style:parent-style-name="Table_20_Contents">
      <style:paragraph-properties fo:text-align="start" style:justify-single-word="false"/>
      <style:text-properties officeooo:rsid="00149377" officeooo:paragraph-rsid="00149377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19cd15" officeooo:paragraph-rsid="0019cd15"/>
    </style:style>
    <style:style style:name="P6" style:family="paragraph" style:parent-style-name="Table_20_Contents">
      <style:paragraph-properties fo:text-align="start" style:justify-single-word="false"/>
      <style:text-properties officeooo:rsid="001d3cf7" officeooo:paragraph-rsid="001f9af6"/>
    </style:style>
    <style:style style:name="P7" style:family="paragraph" style:parent-style-name="Table_20_Contents">
      <style:paragraph-properties fo:text-align="start" style:justify-single-word="false"/>
      <style:text-properties officeooo:rsid="001e588b" officeooo:paragraph-rsid="001f9af6"/>
    </style:style>
    <style:style style:name="P8" style:family="paragraph" style:parent-style-name="Table_20_Contents" style:list-style-name="L2">
      <style:paragraph-properties fo:text-align="start" style:justify-single-word="false"/>
      <style:text-properties officeooo:paragraph-rsid="001f9af6"/>
    </style:style>
    <style:style style:name="P9" style:family="paragraph" style:parent-style-name="Table_20_Contents" style:list-style-name="L2">
      <style:paragraph-properties fo:text-align="start" style:justify-single-word="false"/>
      <style:text-properties officeooo:rsid="001e588b" officeooo:paragraph-rsid="001f9af6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rsid="0022395b" officeooo:paragraph-rsid="0022395b"/>
    </style:style>
    <style:style style:name="P11" style:family="paragraph" style:parent-style-name="Table_20_Contents" style:list-style-name="L2">
      <style:paragraph-properties fo:text-align="start" style:justify-single-word="false"/>
      <style:text-properties officeooo:rsid="00209980" officeooo:paragraph-rsid="00209980"/>
    </style:style>
    <style:style style:name="P12" style:family="paragraph" style:parent-style-name="Table_20_Contents">
      <style:paragraph-properties fo:text-align="start" style:justify-single-word="false"/>
      <style:text-properties officeooo:rsid="00209980" officeooo:paragraph-rsid="00209980"/>
    </style:style>
    <style:style style:name="P13" style:family="paragraph" style:parent-style-name="Table_20_Contents">
      <style:text-properties officeooo:paragraph-rsid="002df13e"/>
    </style:style>
    <style:style style:name="P14" style:family="paragraph" style:parent-style-name="Table_20_Contents">
      <style:text-properties officeooo:paragraph-rsid="0048dfa1"/>
    </style:style>
    <style:style style:name="P15" style:family="paragraph" style:parent-style-name="Table_20_Contents">
      <style:text-properties officeooo:rsid="00497d95" officeooo:paragraph-rsid="00497d95"/>
    </style:style>
    <style:style style:name="P16" style:family="paragraph" style:parent-style-name="Table_20_Contents">
      <style:text-properties officeooo:paragraph-rsid="004d36e9"/>
    </style:style>
    <style:style style:name="P17" style:family="paragraph" style:parent-style-name="Table_20_Contents" style:list-style-name="L3">
      <style:text-properties officeooo:rsid="004e8d19" officeooo:paragraph-rsid="004e8d19"/>
    </style:style>
    <style:style style:name="P18" style:family="paragraph" style:parent-style-name="Table_20_Contents" style:list-style-name="L4">
      <style:text-properties officeooo:paragraph-rsid="004d36e9"/>
    </style:style>
    <style:style style:name="P19" style:family="paragraph" style:parent-style-name="Table_20_Contents" style:list-style-name="L4">
      <style:text-properties officeooo:rsid="00535337" officeooo:paragraph-rsid="00535337"/>
    </style:style>
    <style:style style:name="P20" style:family="paragraph" style:parent-style-name="Table_20_Contents" style:list-style-name="L5">
      <style:text-properties officeooo:rsid="00535337" officeooo:paragraph-rsid="00583494"/>
    </style:style>
    <style:style style:name="P21" style:family="paragraph" style:parent-style-name="Table_20_Contents" style:list-style-name="L5"/>
    <style:style style:name="P22" style:family="paragraph" style:parent-style-name="Table_20_Contents" style:list-style-name="L5">
      <style:text-properties officeooo:rsid="00535337" officeooo:paragraph-rsid="005e0113"/>
    </style:style>
    <style:style style:name="P23" style:family="paragraph" style:parent-style-name="Table_20_Contents" style:list-style-name="L3">
      <style:text-properties officeooo:rsid="00603d83" officeooo:paragraph-rsid="00603d83"/>
    </style:style>
    <style:style style:name="P24" style:family="paragraph" style:parent-style-name="Table_20_Contents">
      <style:text-properties officeooo:rsid="006449a0" officeooo:paragraph-rsid="006449a0"/>
    </style:style>
    <style:style style:name="P25" style:family="paragraph" style:parent-style-name="Table_20_Contents">
      <style:text-properties officeooo:paragraph-rsid="0070d706"/>
    </style:style>
    <style:style style:name="P26" style:family="paragraph" style:parent-style-name="Table_20_Contents">
      <style:text-properties fo:font-style="normal" officeooo:rsid="002ac154" officeooo:paragraph-rsid="00298832" style:font-style-asian="normal" style:font-style-complex="normal"/>
    </style:style>
    <style:style style:name="P27" style:family="paragraph" style:parent-style-name="Table_20_Contents">
      <style:text-properties officeooo:rsid="00209980" officeooo:paragraph-rsid="00298832"/>
    </style:style>
    <style:style style:name="P28" style:family="paragraph" style:parent-style-name="Table_20_Contents">
      <style:text-properties officeooo:rsid="00377dd5" officeooo:paragraph-rsid="00377dd5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153c0f"/>
    </style:style>
    <style:style style:name="T3" style:family="text">
      <style:text-properties fo:color="#127622" loext:opacity="100%" officeooo:rsid="00153c0f"/>
    </style:style>
    <style:style style:name="T4" style:family="text">
      <style:text-properties officeooo:rsid="00162be8"/>
    </style:style>
    <style:style style:name="T5" style:family="text">
      <style:text-properties officeooo:rsid="0016ee23"/>
    </style:style>
    <style:style style:name="T6" style:family="text">
      <style:text-properties fo:color="#127622" loext:opacity="100%"/>
    </style:style>
    <style:style style:name="T7" style:family="text">
      <style:text-properties style:text-position="33% 80%"/>
    </style:style>
    <style:style style:name="T8" style:family="text">
      <style:text-properties officeooo:rsid="001c17b3"/>
    </style:style>
    <style:style style:name="T9" style:family="text">
      <style:text-properties fo:color="#127622" loext:opacity="100%" officeooo:rsid="001c17b3"/>
    </style:style>
    <style:style style:name="T10" style:family="text">
      <style:text-properties fo:color="#127622" loext:opacity="100%" officeooo:rsid="001aa5f5"/>
    </style:style>
    <style:style style:name="T11" style:family="text">
      <style:text-properties officeooo:rsid="0038f463"/>
    </style:style>
    <style:style style:name="T12" style:family="text">
      <style:text-properties fo:color="#127622" loext:opacity="100%" officeooo:rsid="0038f463"/>
    </style:style>
    <style:style style:name="T13" style:family="text">
      <style:text-properties fo:color="#127622" loext:opacity="100%" officeooo:rsid="0038f701"/>
    </style:style>
    <style:style style:name="T14" style:family="text">
      <style:text-properties fo:color="#127622" loext:opacity="100%" officeooo:rsid="00398586"/>
    </style:style>
    <style:style style:name="T15" style:family="text">
      <style:text-properties fo:color="#127622" loext:opacity="100%" officeooo:rsid="003b6de6"/>
    </style:style>
    <style:style style:name="T16" style:family="text">
      <style:text-properties officeooo:rsid="003b6de6"/>
    </style:style>
    <style:style style:name="T17" style:family="text">
      <style:text-properties officeooo:rsid="002df13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588b"/>
    </style:style>
    <style:style style:name="T20" style:family="text">
      <style:text-properties officeooo:rsid="001f9af6"/>
    </style:style>
    <style:style style:name="T21" style:family="text">
      <style:text-properties fo:color="#127622" loext:opacity="100%" officeooo:rsid="001e588b"/>
    </style:style>
    <style:style style:name="T22" style:family="text">
      <style:text-properties fo:color="#127622" loext:opacity="100%" officeooo:rsid="001f9af6"/>
    </style:style>
    <style:style style:name="T23" style:family="text">
      <style:text-properties officeooo:rsid="00209980"/>
    </style:style>
    <style:style style:name="T24" style:family="text">
      <style:text-properties fo:color="#127622" loext:opacity="100%" officeooo:rsid="001f8e85"/>
    </style:style>
    <style:style style:name="T25" style:family="text">
      <style:text-properties officeooo:rsid="0022b405"/>
    </style:style>
    <style:style style:name="T26" style:family="text">
      <style:text-properties officeooo:rsid="003cc7a7"/>
    </style:style>
    <style:style style:name="T27" style:family="text">
      <style:text-properties fo:color="#127622" loext:opacity="100%" officeooo:rsid="003cc7a7"/>
    </style:style>
    <style:style style:name="T28" style:family="text">
      <style:text-properties officeooo:rsid="00272400"/>
    </style:style>
    <style:style style:name="T29" style:family="text">
      <style:text-properties officeooo:rsid="00260ec9"/>
    </style:style>
    <style:style style:name="T30" style:family="text">
      <style:text-properties officeooo:rsid="002f22c5"/>
    </style:style>
    <style:style style:name="T31" style:family="text">
      <style:text-properties fo:font-style="italic" officeooo:rsid="00260ec9" style:font-style-asian="italic" style:font-style-complex="italic"/>
    </style:style>
    <style:style style:name="T32" style:family="text">
      <style:text-properties fo:font-style="normal" officeooo:rsid="00260ec9" style:font-style-asian="normal" style:font-style-complex="normal"/>
    </style:style>
    <style:style style:name="T33" style:family="text">
      <style:text-properties officeooo:rsid="00298832"/>
    </style:style>
    <style:style style:name="T34" style:family="text">
      <style:text-properties fo:color="#127622" loext:opacity="100%" officeooo:rsid="00260ec9"/>
    </style:style>
    <style:style style:name="T35" style:family="text">
      <style:text-properties officeooo:rsid="002cd2f3"/>
    </style:style>
    <style:style style:name="T36" style:family="text">
      <style:text-properties officeooo:rsid="003e11ff"/>
    </style:style>
    <style:style style:name="T37" style:family="text">
      <style:text-properties fo:font-weight="bold" officeooo:rsid="002df13e" style:font-weight-asian="bold" style:font-weight-complex="bold"/>
    </style:style>
    <style:style style:name="T38" style:family="text">
      <style:text-properties officeooo:rsid="0048dfa1"/>
    </style:style>
    <style:style style:name="T39" style:family="text">
      <style:text-properties officeooo:rsid="0075dc58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fo:background-color="#fff5ce" loext:char-shading-value="0"/>
    </style:style>
    <style:style style:name="T42" style:family="text">
      <style:text-properties officeooo:rsid="004bba7b"/>
    </style:style>
    <style:style style:name="T43" style:family="text">
      <style:text-properties fo:color="#127622" loext:opacity="100%" officeooo:rsid="004bba7b"/>
    </style:style>
    <style:style style:name="T44" style:family="text">
      <style:text-properties fo:color="#127622" loext:opacity="100%" officeooo:rsid="004bf41a"/>
    </style:style>
    <style:style style:name="T45" style:family="text">
      <style:text-properties officeooo:rsid="006c199b"/>
    </style:style>
    <style:style style:name="T46" style:family="text">
      <style:text-properties officeooo:rsid="004b35a3"/>
    </style:style>
    <style:style style:name="T47" style:family="text">
      <style:text-properties fo:color="#127622" loext:opacity="100%" officeooo:rsid="004b35a3"/>
    </style:style>
    <style:style style:name="T48" style:family="text">
      <style:text-properties fo:background-color="#dee6ef" loext:char-shading-value="0"/>
    </style:style>
    <style:style style:name="T49" style:family="text">
      <style:text-properties fo:background-color="#fff5ce" loext:char-shading-value="0"/>
    </style:style>
    <style:style style:name="T50" style:family="text">
      <style:text-properties officeooo:rsid="004f3fbe"/>
    </style:style>
    <style:style style:name="T51" style:family="text">
      <style:text-properties officeooo:rsid="004e3fb2"/>
    </style:style>
    <style:style style:name="T52" style:family="text">
      <style:text-properties officeooo:rsid="003204d8"/>
    </style:style>
    <style:style style:name="T53" style:family="text">
      <style:text-properties fo:color="#127622" loext:opacity="100%" officeooo:rsid="003204d8" fo:background-color="transparent" loext:char-shading-value="0"/>
    </style:style>
    <style:style style:name="T54" style:family="text">
      <style:text-properties officeooo:rsid="004ffe5f"/>
    </style:style>
    <style:style style:name="T55" style:family="text">
      <style:text-properties fo:color="#127622" loext:opacity="100%" officeooo:rsid="004ffe5f"/>
    </style:style>
    <style:style style:name="T56" style:family="text">
      <style:text-properties officeooo:rsid="00542d83"/>
    </style:style>
    <style:style style:name="T57" style:family="text">
      <style:text-properties officeooo:rsid="00560ec2"/>
    </style:style>
    <style:style style:name="T58" style:family="text">
      <style:text-properties officeooo:rsid="0056d76d"/>
    </style:style>
    <style:style style:name="T59" style:family="text">
      <style:text-properties fo:font-style="normal" officeooo:rsid="004e8d19" style:font-style-asian="normal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fo:font-style="normal" officeooo:rsid="00575aae" style:font-style-asian="normal" style:font-style-complex="normal"/>
    </style:style>
    <style:style style:name="T63" style:family="text">
      <style:text-properties fo:color="#127622" loext:opacity="100%" fo:font-style="normal" officeooo:rsid="00575aae" style:font-style-asian="normal" style:font-style-complex="normal"/>
    </style:style>
    <style:style style:name="T64" style:family="text">
      <style:text-properties fo:color="#127622" loext:opacity="100%" fo:font-style="normal" officeooo:rsid="005d8e56" style:font-style-asian="normal" style:font-style-complex="normal"/>
    </style:style>
    <style:style style:name="T65" style:family="text">
      <style:text-properties officeooo:rsid="00583494"/>
    </style:style>
    <style:style style:name="T66" style:family="text">
      <style:text-properties fo:color="#127622" loext:opacity="100%" officeooo:rsid="00535337"/>
    </style:style>
    <style:style style:name="T67" style:family="text">
      <style:text-properties fo:color="#127622" loext:opacity="100%" officeooo:rsid="005865bc"/>
    </style:style>
    <style:style style:name="T68" style:family="text">
      <style:text-properties officeooo:rsid="005f1315"/>
    </style:style>
    <style:style style:name="T69" style:family="text">
      <style:text-properties fo:font-style="italic" officeooo:rsid="005f1315" style:font-style-asian="italic" style:font-style-complex="italic"/>
    </style:style>
    <style:style style:name="T70" style:family="text">
      <style:text-properties fo:font-style="normal" officeooo:rsid="005f1315" style:font-style-asian="normal" style:font-style-complex="normal"/>
    </style:style>
    <style:style style:name="T71" style:family="text">
      <style:text-properties officeooo:rsid="005865bc" fo:background-color="#dee6ef" loext:char-shading-value="0"/>
    </style:style>
    <style:style style:name="T72" style:family="text">
      <style:text-properties officeooo:rsid="005865bc"/>
    </style:style>
    <style:style style:name="T73" style:family="text">
      <style:text-properties fo:color="#ff0000" loext:opacity="100%" fo:font-weight="bold" style:font-weight-asian="bold" style:font-weight-complex="bold"/>
    </style:style>
    <style:style style:name="T74" style:family="text">
      <style:text-properties officeooo:rsid="00605a44"/>
    </style:style>
    <style:style style:name="T75" style:family="text">
      <style:text-properties officeooo:rsid="006211db"/>
    </style:style>
    <style:style style:name="T76" style:family="text">
      <style:text-properties officeooo:rsid="006ee8ff"/>
    </style:style>
    <style:style style:name="T77" style:family="text">
      <style:text-properties officeooo:rsid="0062eef7"/>
    </style:style>
    <style:style style:name="T78" style:family="text">
      <style:text-properties officeooo:rsid="0064be2b"/>
    </style:style>
    <style:style style:name="T79" style:family="text">
      <style:text-properties officeooo:rsid="002ac154"/>
    </style:style>
    <style:style style:name="T80" style:family="text">
      <style:text-properties fo:font-style="italic" officeooo:rsid="002ac154" style:font-style-asian="italic" style:font-style-complex="italic"/>
    </style:style>
    <style:style style:name="T81" style:family="text">
      <style:text-properties fo:font-style="normal" officeooo:rsid="002ac154" style:font-style-asian="normal" style:font-style-complex="normal"/>
    </style:style>
    <style:style style:name="T82" style:family="text">
      <style:text-properties fo:font-style="normal" officeooo:rsid="00676c0f" style:font-style-asian="normal" style:font-style-complex="normal"/>
    </style:style>
    <style:style style:name="T83" style:family="text">
      <style:text-properties fo:font-style="normal" officeooo:rsid="00661bae" style:font-style-asian="normal" style:font-style-complex="normal"/>
    </style:style>
    <style:style style:name="T84" style:family="text">
      <style:text-properties officeooo:rsid="006837b7"/>
    </style:style>
    <style:style style:name="T85" style:family="text">
      <style:text-properties officeooo:rsid="00725f0d"/>
    </style:style>
    <style:style style:name="T86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did God command the Israelites to not sow their fields with mixed seed?</text:p>
      <text:p text:style-name="P1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Leviticus 19:19</text:p>
            <text:p text:style-name="P2">¶ Ye shall keep my statutes. Thou shalt not let thy cattle gender with a diverse kind: <text:span text:style-name="T1">thou shalt not sow thy field with mingled seed</text:span>: neither shall a garment mingled of linen and woollen come upon thee.</text:p>
          </table:table-cell>
        </table:table-row>
        <table:table-row>
          <table:table-cell table:style-name="Table1.A2" office:value-type="string">
            <text:p text:style-name="P3">Deuteronomy 22:9</text:p>
            <text:p text:style-name="P2">¶ Thou shalt not sow thy vineyard with divers seeds: <text:span text:style-name="T1">lest the fruit</text:span> of thy seed which thou hast sown, and the fruit of thy vineyard, <text:span text:style-name="T1">be defiled</text:span>.</text:p>
          </table:table-cell>
        </table:table-row>
      </table:table>
      <text:p text:style-name="P2"/>
      <text:p text:style-name="P4"><text:span text:style-name="T2">God explains why in </text:span><text:span text:style-name="T3">Deu 22:9</text:span><text:span text:style-name="T2"> “lest the fruit … be defiled.” But, what does that mean? </text:span><text:span text:style-name="T4">We need God’s wisdom and </text:span><text:span text:style-name="T5">guidance</text:span><text:span text:style-name="T4"> to answer our appropriate question which we’re asking the wrong way:</text:span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6">Romans 15:4</text:span><text:line-break/>For whatsoever things were written aforetime were written <text:span text:style-name="T1">for our learning</text:span>, that we through patience and comfort of the scriptures might have hope.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6">Romans 6:14-15</text:span><text:line-break/><text:span text:style-name="T7">14</text:span> For sin shall not have dominion over you: for <text:span text:style-name="T1">ye are not under the law</text:span>, but under grace. <text:line-break/><text:span text:style-name="T7">15</text:span> What then? shall we sin, because <text:span text:style-name="T1">we are not under the law</text:span>, but under grace? God forbid.</text:p>
          </table:table-cell>
        </table:table-row>
      </table:table>
      <text:list text:style-name="L1">
        <text:list-item>
          <text:p text:style-name="P5">The saints of God <text:span text:style-name="T8">(</text:span><text:span text:style-name="T9">Eph 1:1</text:span><text:span text:style-name="T8">, </text:span><text:span text:style-name="T9">2:19</text:span><text:span text:style-name="T8">, </text:span><text:span text:style-name="T9">4:12</text:span><text:span text:style-name="T8">) </text:span>that are sanctified by Him (<text:span text:style-name="T6">1Cor 6:11,</text:span><text:span text:style-name="T10">12</text:span>) are not under the law nor obligated to keep it <text:span text:style-name="T11">(</text:span><text:span text:style-name="T12">Acts 15:5,</text:span><text:span text:style-name="T13">10,</text:span><text:span text:style-name="T14">20,</text:span><text:span text:style-name="T15">24,28,29</text:span><text:span text:style-name="T16">)</text:span>.</text:p>
        </text:list-item>
      </text:list>
      <text:p text:style-name="P2"/>
      <text:p text:style-name="P6">So, if we’re not obligated to keep the law then how <text:span text:style-name="T17">could the fruit of the fields</text:span> be <text:span text:style-name="T18">defiled</text:span> if we sow <text:span text:style-name="T18">diverse</text:span> seeds in them? <text:span text:style-name="T19">To understand this point better refer to the article “Cultivating the fields of God” (</text:span><text:a xlink:type="simple" xlink:href="https://cheerful-wmcdannell.wordpress.com/2025/09/17/cultivating-in-the-spirit/" text:style-name="Internet_20_link" text:visited-style-name="Visited_20_Internet_20_Link"><text:span text:style-name="T19">https://cheerful-wmcdannell.wordpress.com/2025/09/17/cultivating-in-the-spirit/</text:span></text:a><text:span text:style-name="T19">).</text:span></text:p>
      <text:p text:style-name="P6"/>
      <text:p text:style-name="P7">A quick summary of that article:</text:p>
      <text:list text:style-name="L2">
        <text:list-item>
          <text:p text:style-name="P8"><text:span text:style-name="T20">T</text:span><text:span text:style-name="T19">hose that are saved from the wrath to come are made laborers </text:span><text:span text:style-name="T20">(sanctified: set aside for the work of God) </text:span><text:span text:style-name="T19">together with God by God (</text:span><text:span text:style-name="T21">John 4:35</text:span><text:span text:style-name="T19">, </text:span><text:span text:style-name="T21">1Cor 3:6-11</text:span><text:span text:style-name="T19">) in the “fields” of God.</text:span></text:p>
        </text:list-item>
        <text:list-item>
          <text:p text:style-name="P8"><text:span text:style-name="T19">The fields of God are human hearts </text:span><text:span text:style-name="T20">(</text:span><text:span text:style-name="T22">John 4:35</text:span><text:span text:style-name="T20">)</text:span><text:span text:style-name="T19">.</text:span></text:p>
        </text:list-item>
        <text:list-item>
          <text:p text:style-name="P9">The parable of the sower (<text:span text:style-name="T6">Matthew 13:3-8,18-23</text:span>, <text:span text:style-name="T6">Mark 4:3-8, 13-20</text:span>, <text:span text:style-name="T6">Luke 8:5-8, 11-15</text:span>) explains to us that the “seed” is the word of God <text:span text:style-name="T23">(and much more).</text:span></text:p>
        </text:list-item>
        <text:list-item>
          <text:p text:style-name="P10">The sower is the man or woman of God (<text:span text:style-name="T6">Isaiah 55:10,11</text:span>) and the seed comes directly from God.</text:p>
        </text:list-item>
        <text:list-item>
          <text:p text:style-name="P8"><text:span text:style-name="T19">We’re all given diverse spiritual gifts, divided severally as He wills, for the perfecting of the saints, the work of the ministry, and for the edifying of the body of Christ (</text:span><text:span text:style-name="T21">Eph 4:8-12</text:span><text:span text:style-name="T19">, </text:span><text:span text:style-name="T21">1Cor 12:</text:span><text:span text:style-name="T24">4-</text:span><text:span text:style-name="T22">11</text:span><text:span text:style-name="T20">).</text:span></text:p>
        </text:list-item>
        <text:list-item>
          <text:p text:style-name="P11"><text:span text:style-name="T25">How do we know which seed goes into which field, when, and how?</text:span> <text:span text:style-name="T6">Isaiah 28:23-29</text:span> <text:span text:style-name="T25">(</text:span><text:span text:style-name="T26">v</text:span><text:span text:style-name="T27">26</text:span><text:span text:style-name="T25">).</text:span></text:p>
        </text:list-item>
      </text:list>
      <text:p text:style-name="P12"/>
      <text:p text:style-name="P13"><text:span text:style-name="T28">Learning all that from the word of God: </text:span><text:span text:style-name="T29">now we can come full circle back to our question, this time with the right perspective: how can we defile </text:span><text:span text:style-name="T30">the fruit or product of a person’s labors</text:span><text:span text:style-name="T29">? By sowing </text:span><text:span text:style-name="T31">diverse</text:span><text:span text:style-name="T32"> (different kinds) or </text:span><text:span text:style-name="T31">mingled</text:span> <text:span text:style-name="T29">(mixed) seed </text:span><text:span text:style-name="T30">in that field.</text:span><text:span text:style-name="T29"> </text:span><text:span text:style-name="T17">What could we possibl</text:span><text:span text:style-name="T30">y</text:span><text:span text:style-name="T17"> mix </text:span><text:span text:style-name="T30">with </text:span><text:span text:style-name="T17">the word of God that could defile the product of a field: </text:span><text:span text:style-name="T30">the flesh, the world, and the devil.</text:span></text:p>
      <text:p text:style-name="P13"/>
      <text:p text:style-name="P13"><text:span text:style-name="T33">Therefore, t</text:span><text:span text:style-name="T29">he seed that we sow to people must needs be the pure word of God or “as the oracles of God” (</text:span><text:span text:style-name="T34">1Pet 4:11</text:span><text:span text:style-name="T29">) </text:span><text:span text:style-name="T17">(w</text:span><text:span text:style-name="T35">e might say “like the word of God”</text:span><text:span text:style-name="T17">)</text:span><text:span text:style-name="T29"> </text:span><text:span text:style-name="T17">or </text:span><text:span text:style-name="T36">the fruit of that</text:span><text:span text:style-name="T17"> field </text:span><text:span text:style-name="T37">will be</text:span><text:span text:style-name="T17"> defiled</text:span><text:span text:style-name="T29">. </text:span><text:span text:style-name="T38">If the seed is good, </text:span><text:span text:style-name="T39">and it finds good ground</text:span><text:span text:style-name="T38">, the fruit will be good. But it all starts with the seed.</text:span></text:p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6">Matthew 7:18</text:span><text:line-break/><text:span text:style-name="T40">A good tree </text:span><text:span text:style-name="T41">cannot</text:span><text:span text:style-name="T40"> bring forth evil fruit, </text:span><text:span text:style-name="T41">neither can</text:span><text:span text:style-name="T40"> a corrupt tree bring forth good fruit.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8">Here are some examples:</text:span></text:p>
      <text:p text:style-name="P14"/>
      <text:p text:style-name="P15">In this example, the adversary attempts to <text:span text:style-name="T42">entice</text:span> Jesus <text:span text:style-name="T42">to do evil (</text:span><text:span text:style-name="T43">James 1:13,</text:span><text:span text:style-name="T44">14</text:span><text:span text:style-name="T42">) </text:span>by <text:span text:style-name="T18">seemingly</text:span> quoting the word of God. However, if we look carefully at what he said and we compare it to the word of God (<text:span text:style-name="T6">John 7:24</text:span>) we will take notice that he both took away from and added to the word of God <text:span text:style-name="T45">(mingled it with his own word/seed)</text:span>. What exactly he changed is the key <text:span text:style-name="T46">to determining that, even though he didn’t speak exactly the word of God, was what he said “as the oracles of God” (</text:span><text:span text:style-name="T47">1Pet 4:11</text:span><text:span text:style-name="T46">) or not?</text:span>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6">Luke 4:9-12</text:span><text:line-break/><text:span text:style-name="T7">9</text:span> And he brought him to Jerusalem, and set him on a pinnacle of the temple, and said unto him, <text:span text:style-name="T48">If thou be the Son of God</text:span>, cast thyself down from hence:</text:p>
            <text:p text:style-name="P16"><text:span text:style-name="T7">10</text:span> For it is written, He shall give his angels charge over thee, to keep thee:</text:p>
            <text:p text:style-name="P16"><text:span text:style-name="T7">11</text:span> And in their hands they shall bear thee up, lest <text:span text:style-name="T49">at any time</text:span> thou dash thy foot against a stone.</text:p>
            <text:p text:style-name="P16"><text:span text:style-name="T7">12</text:span> And Jesus answering said unto him, <text:span text:style-name="T40">It is said, Thou shalt not tempt the Lord thy God.</text:span></text:p>
          </table:table-cell>
        </table:table-row>
      </table:table>
      <text:list xml:id="list1840235376" text:style-name="L3">
        <text:list-item>
          <text:p text:style-name="P17">The adversary makes at least two mistakes here and if he could receive it (<text:span text:style-name="T6">John 8:42-47</text:span>) they could both be corrected simply with <text:span text:style-name="T50">the commandment </text:span>“<text:span text:style-name="T40">Thou shalt not tempt the Lord thy God.</text:span>”</text:p>
        </text:list-item>
      </text:list>
      <text:list text:style-name="L4">
        <text:list-item>
          <text:list>
            <text:list-item>
              <text:p text:style-name="P18"><text:span text:style-name="T51">Does</text:span><text:span text:style-name="T52"> </text:span><text:span text:style-name="T53">Psalm 91:11,12</text:span> say “at any time”? <text:span text:style-name="T54">By adding that phrase, Satan not only masqueraded his deception with a fake “word of God” (</text:span><text:span text:style-name="T55">Isaiah 14:14</text:span><text:span text:style-name="T54">) but also completely changed the meaning to imply that it’s </text:span><text:span text:style-name="T56">ok</text:span><text:span text:style-name="T54"> for Jesus to just jump off the pinnacle of the temple </text:span><text:span text:style-name="T56">anytime He feels like it </text:span><text:span text:style-name="T57">because the angels will catch Him </text:span><text:span text:style-name="T58">and keep Him from getting hurt.</text:span></text:p>
            </text:list-item>
            <text:list-item>
              <text:p text:style-name="P19"><text:span text:style-name="T59">T</text:span><text:span text:style-name="T60">he adversary begins with the phrase “</text:span><text:span text:style-name="T61">If</text:span><text:span text:style-name="T60"> thou be the Son of God”. </text:span><text:span text:style-name="T62">That phrase, in and of itself, is tempting God exactly the same way that the children of Israel did in </text:span><text:span text:style-name="T63">Exod</text:span><text:span text:style-name="T64">u</text:span><text:span text:style-name="T63">s 17:7</text:span><text:span text:style-name="T62">.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<text:span text:style-name="T65">How did God respond to that tempting in the OT and the NT?</text:span></text:p>
                  <text:list>
                    <text:list-item>
                      <text:p text:style-name="P21"><text:span text:style-name="T66">Exodus 17:</text:span><text:span text:style-name="T67">7,</text:span><text:span text:style-name="T66">8</text:span> <text:span text:style-name="T68">(Amalek is a figure of </text:span><text:span text:style-name="T69">the flesh</text:span><text:span text:style-name="T70">)</text:span></text:p>
                      <text:list>
                        <text:list-item>
                          <text:p text:style-name="P22">...<text:span text:style-name="T71">Is the LORD among us, or not?</text:span><text:span text:style-name="T72"> </text:span>Then came Amalek, and <text:span text:style-name="T49">fought with Israel</text:span> in Rephidim.</text:p>
                        </text:list-item>
                      </text:list>
                    </text:list-item>
                    <text:list-item>
                      <text:p text:style-name="P22"><text:span text:style-name="T6">Matthew 12:38-39</text:span>:</text:p>
                      <text:list>
                        <text:list-item>
                          <text:p text:style-name="P22">Then certain of the scribes and of the Pharisees answered, saying, Master, <text:span text:style-name="T48">we would see a sign from thee.</text:span> But he answered and said unto them, <text:span text:style-name="T40">An </text:span><text:span text:style-name="T73">evil</text:span><text:span text:style-name="T40"> and adulterous generation seeketh after a sign; and </text:span><text:span text:style-name="T41">there shall no sign be given to it</text:span><text:span text:style-name="T40">, but the sign of the prophet Jona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840235376" text:style-name="L3">
        <text:list-item>
          <text:p text:style-name="P23">Now, what <text:span text:style-name="T74">would happen if we take</text:span> that mingled seed that Satan tried to sow? <text:span text:style-name="T74">We might think “yea, you’re right. I can jump off anytime I want” </text:span><text:span text:style-name="T75">which is corrupt fruit. </text:span><text:span text:style-name="T76">And, it </text:span><text:span text:style-name="T77">could bear more corrupt fruit if allowed.</text:span></text:p>
        </text:list-item>
      </text:list>
      <text:p text:style-name="Table_20_Contents"/>
      <text:p text:style-name="Table_20_Contents"/>
      <text:p text:style-name="P24">The following example is one of sowing seed that is “as the oracles of God” <text:span text:style-name="T46">(</text:span><text:span text:style-name="T47">1Pet 4:11</text:span><text:span text:style-name="T46">).</text:span></text:p>
      <text:p text:style-name="P24"/>
      <text:p text:style-name="P25"><text:span text:style-name="T78">Take the following saying: “</text:span><text:span text:style-name="T33">The Golden rule” </text:span><text:span text:style-name="T78">which is generally</text:span><text:span text:style-name="T33"> “</text:span><text:span text:style-name="T79">Treat others how you want to be treated.” That phrase is </text:span><text:span text:style-name="T80">like</text:span><text:span text:style-name="T81"> the word of God </text:span><text:span text:style-name="T82">because it</text:span><text:span text:style-name="T83"> </text:span><text:span text:style-name="T82">conveys</text:span><text:span text:style-name="T83"> the exact same </text:span><text:span text:style-name="T82">idea</text:span><text:span text:style-name="T83"> a different way:</text:span></text:p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6">Matthew 7:12</text:span><text:line-break/><text:span text:style-name="T40">Therefore all things whatsoever ye would that men should do to you, do ye even so to them: for this is the law and the prophets.</text:span></text:p>
          </table:table-cell>
        </table:table-row>
        <table:table-row>
          <table:table-cell table:style-name="Table4.A2" office:value-type="string">
            <text:p text:style-name="Table_20_Contents"><text:span text:style-name="T6">Luke 6:31</text:span><text:line-break/><text:span text:style-name="T40">And as ye would that men should do to you, do ye also to them likewise.</text:span></text:p>
          </table:table-cell>
        </table:table-row>
      </table:table>
      <text:p text:style-name="P27"/>
      <text:p text:style-name="P28">Therefore, <text:span text:style-name="T84">it is not mingled seed, and if it </text:span><text:span text:style-name="T85">finds good ground it will not </text:span><text:span text:style-name="T84">bear </text:span><text:span text:style-name="T85">e</text:span><text:span text:style-name="T84">vil or corrupt </text:span><text:span text:style-name="T85">fruit.</text:span></text:p>
      <text:p text:style-name="P28"/>
      <text:p text:style-name="P28"/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6">Matthew 7:15-20</text:span><text:line-break/><text:span text:style-name="T7">15</text:span> <text:span text:style-name="T40">Beware of false prophets, </text:span><text:span text:style-name="T41">which come to you in sheep's clothing</text:span><text:span text:style-name="T40">, but inwardly they are ravening wolves.</text:span> <text:span text:style-name="T7">16</text:span> <text:span text:style-name="T41">Ye shall know them by their fruits.</text:span><text:span text:style-name="T40"> Do men gather grapes of thorns, or figs of thistles?</text:span> <text:span text:style-name="T7">17</text:span> <text:span text:style-name="T40">Even so every good tree bringeth forth good fruit; but a corrupt tree bringeth forth evil fruit.</text:span> <text:span text:style-name="T7">18</text:span> <text:span text:style-name="T40">A good tree cannot bring forth evil fruit, neither can a corrupt tree bring forth good fruit.</text:span> <text:span text:style-name="T7">19</text:span> <text:span text:style-name="T40">Every tree that bringeth not forth good fruit is hewn down, and cast into the fire.</text:span> <text:span text:style-name="T7">20</text:span> <text:span text:style-name="T86">Wherefore </text:span><text:span text:style-name="T41">by their fruits ye shall know them</text:span><text:span text:style-name="T40">.</text:span></text:p>
          </table:table-cell>
        </table:table-row>
        <table:table-row>
          <table:table-cell table:style-name="Table7.A2" office:value-type="string">
            <text:p text:style-name="Table_20_Contents"><text:span text:style-name="T6">Luke 6:43-44</text:span><text:line-break/><text:span text:style-name="T7">43</text:span> <text:span text:style-name="T40">For a good tree bringeth not forth corrupt fruit; neither doth a corrupt tree bring forth good fruit.</text:span> <text:span text:style-name="T7">44</text:span> <text:span text:style-name="T41">For every tree is known by his own fruit.</text:span><text:span text:style-name="T40"> For of thorns men do not gather figs, nor of a bramble bush gather they grapes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3:46:53.564050600</meta:creation-date>
    <dc:title>Thou shalt not sow thy field with mingled seed</dc:title>
    <meta:editing-duration>PT2H40M6S</meta:editing-duration>
    <meta:editing-cycles>101</meta:editing-cycles>
    <meta:generator>LibreOffice/25.8.3.2$Windows_X86_64 LibreOffice_project/8ca8d55c161d602844f5428fa4b58097424e324e</meta:generator>
    <meta:initial-creator>William K. McDannell Jr.</meta:initial-creator>
    <dc:date>2025-12-09T07:13:36.493638500</dc:date>
    <dc:creator>William K. McDannell Jr.</dc:creator>
    <meta:document-statistic meta:table-count="7" meta:image-count="0" meta:object-count="0" meta:page-count="2" meta:paragraph-count="42" meta:word-count="1286" meta:character-count="6814" meta:non-whitespace-character-count="5585"/>
    <meta:template xlink:type="simple" xlink:actuate="onRequest" xlink:title="default" xlink:href="../../../../AppData/Roaming/LibreOffice/4/user/template/default.ott" meta:date="2025-10-05T13:46:53.320345200"/>
  </office:meta>
</office:document-meta>
</file>