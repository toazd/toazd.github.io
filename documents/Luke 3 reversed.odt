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3.9104in" style:rel-column-width="30875*"/>
    </style:style>
    <style:style style:name="Table1.B" style:family="table-column">
      <style:table-column-properties style:column-width="4.3896in" style:rel-column-width="3466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P1" style:family="paragraph" style:parent-style-name="Table_20_Contents">
      <style:text-properties style:font-name="Liberation Sans" fo:font-size="10.5pt" officeooo:paragraph-rsid="002bb7a9" style:font-size-asian="10.5pt" style:font-size-complex="10.5pt"/>
    </style:style>
    <style:style style:name="P2" style:family="paragraph" style:parent-style-name="Table_20_Contents" style:list-style-name="L1">
      <style:text-properties style:font-name="Liberation Sans" fo:font-size="10.5pt" officeooo:rsid="000aa1b0" officeooo:paragraph-rsid="000aa1b0" style:font-size-asian="10.5pt" style:font-size-complex="10.5pt"/>
    </style:style>
    <style:style style:name="P3" style:family="paragraph" style:parent-style-name="Table_20_Contents" style:list-style-name="L1">
      <style:text-properties style:font-name="Liberation Sans" fo:font-size="10.5pt" officeooo:rsid="000c47c0" officeooo:paragraph-rsid="000c47c0" style:font-size-asian="10.5pt" style:font-size-complex="10.5pt"/>
    </style:style>
    <style:style style:name="P4" style:family="paragraph" style:parent-style-name="Table_20_Contents" style:list-style-name="L1">
      <style:text-properties style:font-name="Liberation Sans" fo:font-size="10.5pt" officeooo:rsid="000c47c0" officeooo:paragraph-rsid="000ef39e" style:font-size-asian="10.5pt" style:font-size-complex="10.5pt"/>
    </style:style>
    <style:style style:name="P5" style:family="paragraph" style:parent-style-name="Table_20_Contents" style:list-style-name="L1">
      <style:text-properties style:font-name="Liberation Sans" fo:font-size="10.5pt" officeooo:rsid="000d1409" officeooo:paragraph-rsid="000ef39e" style:font-size-asian="10.5pt" style:font-size-complex="10.5pt"/>
    </style:style>
    <style:style style:name="P6" style:family="paragraph" style:parent-style-name="Table_20_Contents" style:list-style-name="L1">
      <style:text-properties style:font-name="Liberation Sans" fo:font-size="10.5pt" officeooo:rsid="000d1409" officeooo:paragraph-rsid="00102f26" style:font-size-asian="10.5pt" style:font-size-complex="10.5pt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officeooo:rsid="0016c929"/>
    </style:style>
    <style:style style:name="T5" style:family="text">
      <style:text-properties officeooo:rsid="0017d168"/>
    </style:style>
    <style:style style:name="T6" style:family="text">
      <style:text-properties officeooo:rsid="0019b9de"/>
    </style:style>
    <style:style style:name="T7" style:family="text">
      <style:text-properties officeooo:rsid="001b3e2c"/>
    </style:style>
    <style:style style:name="T8" style:family="text">
      <style:text-properties officeooo:rsid="001d3609"/>
    </style:style>
    <style:style style:name="T9" style:family="text">
      <style:text-properties officeooo:rsid="001d566d"/>
    </style:style>
    <style:style style:name="T10" style:family="text">
      <style:text-properties officeooo:rsid="001e110d"/>
    </style:style>
    <style:style style:name="T11" style:family="text">
      <style:text-properties officeooo:rsid="001e38e7"/>
    </style:style>
    <style:style style:name="T12" style:family="text">
      <style:text-properties officeooo:rsid="001f065c"/>
    </style:style>
    <style:style style:name="T13" style:family="text">
      <style:text-properties officeooo:rsid="00209704"/>
    </style:style>
    <style:style style:name="T14" style:family="text">
      <style:text-properties officeooo:rsid="0021fe59"/>
    </style:style>
    <style:style style:name="T15" style:family="text">
      <style:text-properties officeooo:rsid="00229645"/>
    </style:style>
    <style:style style:name="T16" style:family="text">
      <style:text-properties officeooo:rsid="0023c576"/>
    </style:style>
    <style:style style:name="T17" style:family="text">
      <style:text-properties officeooo:rsid="00241a67"/>
    </style:style>
    <style:style style:name="T18" style:family="text">
      <style:text-properties officeooo:rsid="002795b4"/>
    </style:style>
    <style:style style:name="T19" style:family="text">
      <style:text-properties officeooo:rsid="0027ac6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Luke 3:23-38</text:span><text:line-break/><text:span text:style-name="T2">23</text:span> And Jesus himself began to be about thirty years of age, being (as was supposed) the son of Joseph, which was <text:span text:style-name="T3">the son</text:span> of Heli,</text:p>
            <text:p text:style-name="P1"><text:span text:style-name="T2">24</text:span> Which was <text:span text:style-name="T3">the son</text:span> of Matthat, which was <text:span text:style-name="T3">the son</text:span> of Levi, which was <text:span text:style-name="T3">the son</text:span> of Melchi, which was <text:span text:style-name="T3">the son</text:span> of Janna, which was <text:span text:style-name="T3">the son</text:span> of Joseph,</text:p>
            <text:p text:style-name="P1"><text:span text:style-name="T2">25</text:span> Which was <text:span text:style-name="T3">the son</text:span> of Mattathias, which was <text:span text:style-name="T3">the son</text:span> of Amos, which was <text:span text:style-name="T3">the son</text:span> of Naum, which was <text:span text:style-name="T3">the son</text:span> of Esli, which was <text:span text:style-name="T3">the son</text:span> of Nagge,</text:p>
            <text:p text:style-name="P1"><text:span text:style-name="T2">26</text:span> Which was <text:span text:style-name="T3">the son</text:span> of Maath, which was <text:span text:style-name="T3">the son</text:span> of Mattathias, which was <text:span text:style-name="T3">the son</text:span> of Semei, which was <text:span text:style-name="T3">the son</text:span> of Joseph, which was <text:span text:style-name="T3">the son</text:span> of Juda,</text:p>
            <text:p text:style-name="P1"><text:span text:style-name="T2">27</text:span> Which was <text:span text:style-name="T3">the son</text:span> of Joanna, which was <text:span text:style-name="T3">the son</text:span> of Rhesa, which was <text:span text:style-name="T3">the son</text:span> of Zorobabel, which was <text:span text:style-name="T3">the son</text:span> of Salathiel, which was <text:span text:style-name="T3">the son</text:span> of Neri,</text:p>
            <text:p text:style-name="P1"><text:span text:style-name="T2">28</text:span> Which was <text:span text:style-name="T3">the son</text:span> of Melchi, which was <text:span text:style-name="T3">the son</text:span> of Addi, which was <text:span text:style-name="T3">the son</text:span> of Cosam, which was <text:span text:style-name="T3">the son</text:span> of Elmodam, which was <text:span text:style-name="T3">the son</text:span> of Er,</text:p>
            <text:p text:style-name="P1"><text:span text:style-name="T2">29</text:span> Which was <text:span text:style-name="T3">the son</text:span> of Jose, which was <text:span text:style-name="T3">the son</text:span> of Eliezer, which was <text:span text:style-name="T3">the son</text:span> of Jorim, which was <text:span text:style-name="T3">the son</text:span> of Matthat, which was <text:span text:style-name="T3">the son</text:span> of Levi,</text:p>
            <text:p text:style-name="P1"><text:span text:style-name="T2">30</text:span> Which was <text:span text:style-name="T3">the son</text:span> of Simeon, which was <text:span text:style-name="T3">the son</text:span> of Juda, which was <text:span text:style-name="T3">the son</text:span> of Joseph, which was <text:span text:style-name="T3">the son</text:span> of Jonan, which was <text:span text:style-name="T3">the son</text:span> of Eliakim,</text:p>
            <text:p text:style-name="P1"><text:span text:style-name="T2">31</text:span> Which was <text:span text:style-name="T3">the son</text:span> of Melea, which was <text:span text:style-name="T3">the son</text:span> of Menan, which was <text:span text:style-name="T3">the son</text:span> of Mattatha, which was <text:span text:style-name="T3">the son</text:span> of Nathan, which was <text:span text:style-name="T3">the son</text:span> of David,</text:p>
            <text:p text:style-name="P1"><text:span text:style-name="T2">32</text:span> Which was <text:span text:style-name="T3">the son</text:span> of Jesse, which was <text:span text:style-name="T3">the son</text:span> of Obed, which was <text:span text:style-name="T3">the son</text:span> of Booz, which was <text:span text:style-name="T3">the son</text:span> of Salmon, which was <text:span text:style-name="T3">the son</text:span> of Naasson,</text:p>
            <text:p text:style-name="P1"><text:span text:style-name="T2">33</text:span> Which was <text:span text:style-name="T3">the son</text:span> of Aminadab, which was <text:span text:style-name="T3">the son</text:span> of Aram, which was <text:span text:style-name="T3">the son</text:span> of Esrom, which was <text:span text:style-name="T3">the son</text:span> of Phares, which was <text:span text:style-name="T3">the son</text:span> of Juda,</text:p>
            <text:p text:style-name="P1"><text:span text:style-name="T2">34</text:span> Which was <text:span text:style-name="T3">the son</text:span> of Jacob, which was <text:span text:style-name="T3">the son</text:span> of Isaac, which was <text:span text:style-name="T3">the son</text:span> of Abraham, which was <text:span text:style-name="T3">the son</text:span> of Thara, which was <text:span text:style-name="T3">the son</text:span> of Nachor,</text:p>
            <text:p text:style-name="P1"><text:span text:style-name="T2">35</text:span> Which was <text:span text:style-name="T3">the son</text:span> of Saruch, which was <text:span text:style-name="T3">the son</text:span> of Ragau, which was <text:span text:style-name="T3">the son</text:span> of Phalec, which was <text:span text:style-name="T3">the son</text:span> of Heber, which was <text:span text:style-name="T3">the son</text:span> of Sala,</text:p>
            <text:p text:style-name="P1"><text:span text:style-name="T2">36</text:span> Which was <text:span text:style-name="T3">the son</text:span> of Cainan, which was <text:span text:style-name="T3">the son</text:span> of Arphaxad, which was <text:span text:style-name="T3">the son</text:span> of Sem, which was <text:span text:style-name="T3">the son</text:span> of Noe, which was <text:span text:style-name="T3">the son</text:span> of Lamech,</text:p>
            <text:p text:style-name="P1"><text:span text:style-name="T2">37</text:span> Which was <text:span text:style-name="T3">the son</text:span> of Mathusala, which was <text:span text:style-name="T3">the son</text:span> of Enoch, which was <text:span text:style-name="T3">the son</text:span> of Jared, which was <text:span text:style-name="T3">the son</text:span> of Maleleel, which was <text:span text:style-name="T3">the son</text:span> of Cainan,</text:p>
            <text:p text:style-name="P1"><text:span text:style-name="T2">38</text:span> Which was <text:span text:style-name="T3">the son</text:span> of Enos, which was <text:span text:style-name="T3">the son</text:span> of Seth, which was <text:span text:style-name="T3">the son</text:span> of Adam, which was <text:span text:style-name="T3">the son</text:span> of God.</text:p>
          </table:table-cell>
          <table:table-cell table:style-name="Table1.B1" office:value-type="string">
            <text:list text:style-name="L1">
              <text:list-item>
                <text:p text:style-name="P2">God</text:p>
              </text:list-item>
              <text:list-item>
                <text:p text:style-name="P2">Adam</text:p>
              </text:list-item>
              <text:list-item>
                <text:p text:style-name="P2">Seth</text:p>
              </text:list-item>
              <text:list-item>
                <text:p text:style-name="P2">Enos</text:p>
              </text:list-item>
              <text:list-item>
                <text:p text:style-name="P2">Cainan</text:p>
              </text:list-item>
              <text:list-item>
                <text:p text:style-name="P2">Maleleel / Mahalaleel</text:p>
              </text:list-item>
              <text:list-item>
                <text:p text:style-name="P2">Jared</text:p>
              </text:list-item>
              <text:list-item>
                <text:p text:style-name="P2">Enoch</text:p>
              </text:list-item>
              <text:list-item>
                <text:p text:style-name="P2">Mathusala / Methuselah</text:p>
              </text:list-item>
              <text:list-item>
                <text:p text:style-name="P2">Lamech</text:p>
              </text:list-item>
              <text:list-item>
                <text:p text:style-name="P2">Noe / <text:span text:style-name="T4">Noah</text:span></text:p>
              </text:list-item>
              <text:list-item>
                <text:p text:style-name="P2">Sem / <text:span text:style-name="T5">Shem</text:span></text:p>
              </text:list-item>
              <text:list-item>
                <text:p text:style-name="P2">Arphaxad</text:p>
              </text:list-item>
              <text:list-item>
                <text:p text:style-name="P2">Cainan</text:p>
              </text:list-item>
              <text:list-item>
                <text:p text:style-name="P2">Sala / <text:span text:style-name="T6">Salah / </text:span><text:span text:style-name="T7">Shelah</text:span></text:p>
              </text:list-item>
              <text:list-item>
                <text:p text:style-name="P2">Heber / <text:span text:style-name="T8">Eber</text:span></text:p>
              </text:list-item>
              <text:list-item>
                <text:p text:style-name="P2">Phalec / <text:span text:style-name="T9">Peleg</text:span></text:p>
              </text:list-item>
              <text:list-item>
                <text:p text:style-name="P2">Ragau / <text:span text:style-name="T10">Reu</text:span></text:p>
              </text:list-item>
              <text:list-item>
                <text:p text:style-name="P2">Saruch / <text:span text:style-name="T11">Serug</text:span></text:p>
              </text:list-item>
              <text:list-item>
                <text:p text:style-name="P2">Nachor / <text:span text:style-name="T12">Nahor</text:span></text:p>
              </text:list-item>
              <text:list-item>
                <text:p text:style-name="P2">Thara / <text:span text:style-name="T13">Terah</text:span></text:p>
              </text:list-item>
              <text:list-item>
                <text:p text:style-name="P2">Abraham / <text:span text:style-name="T14">Abram</text:span></text:p>
              </text:list-item>
              <text:list-item>
                <text:p text:style-name="P2">Isaac</text:p>
              </text:list-item>
              <text:list-item>
                <text:p text:style-name="P2">Jacob</text:p>
              </text:list-item>
              <text:list-item>
                <text:p text:style-name="P3">Juda / <text:span text:style-name="T15">Judah</text:span></text:p>
              </text:list-item>
              <text:list-item>
                <text:p text:style-name="P3">Phares / <text:span text:style-name="T15">Pharez</text:span></text:p>
              </text:list-item>
              <text:list-item>
                <text:p text:style-name="P3">Esrom / <text:span text:style-name="T16">Hezron</text:span></text:p>
              </text:list-item>
              <text:list-item>
                <text:p text:style-name="P3">Aram / <text:span text:style-name="T17">Ram</text:span></text:p>
              </text:list-item>
              <text:list-item>
                <text:p text:style-name="P3">Aminadab / Amminadab</text:p>
              </text:list-item>
              <text:list-item>
                <text:p text:style-name="P3">Naasson / Nahshon</text:p>
              </text:list-item>
              <text:list-item>
                <text:p text:style-name="P3">Salman / <text:span text:style-name="T18">Salmon</text:span></text:p>
              </text:list-item>
              <text:list-item>
                <text:p text:style-name="P3">Booz / <text:span text:style-name="T19">Boaz</text:span></text:p>
              </text:list-item>
              <text:list-item>
                <text:p text:style-name="P3">Obed</text:p>
              </text:list-item>
              <text:list-item>
                <text:p text:style-name="P3">Jesse</text:p>
              </text:list-item>
              <text:list-item>
                <text:p text:style-name="P3">David</text:p>
              </text:list-item>
              <text:list-item>
                <text:p text:style-name="P3">Nathan</text:p>
              </text:list-item>
              <text:list-item>
                <text:p text:style-name="P3">Mattatha</text:p>
              </text:list-item>
              <text:list-item>
                <text:p text:style-name="P3">Menan</text:p>
              </text:list-item>
              <text:list-item>
                <text:p text:style-name="P4">Melea</text:p>
              </text:list-item>
              <text:list-item>
                <text:p text:style-name="P4">Eliakim</text:p>
              </text:list-item>
              <text:list-item>
                <text:p text:style-name="P4">Jonan</text:p>
              </text:list-item>
              <text:list-item>
                <text:p text:style-name="P5">Joseph</text:p>
              </text:list-item>
              <text:list-item>
                <text:p text:style-name="P5">Juda</text:p>
              </text:list-item>
              <text:list-item>
                <text:p text:style-name="P5">Simeon</text:p>
              </text:list-item>
              <text:list-item>
                <text:p text:style-name="P5">Levi</text:p>
              </text:list-item>
              <text:list-item>
                <text:p text:style-name="P5">Matthat</text:p>
              </text:list-item>
              <text:list-item>
                <text:p text:style-name="P5">Jorim</text:p>
              </text:list-item>
              <text:list-item>
                <text:p text:style-name="P5">Eliezer</text:p>
              </text:list-item>
              <text:list-item>
                <text:p text:style-name="P5">Jose</text:p>
              </text:list-item>
              <text:list-item>
                <text:p text:style-name="P6">Er</text:p>
              </text:list-item>
              <text:list-item>
                <text:p text:style-name="P6">Elmodam</text:p>
              </text:list-item>
              <text:list-item>
                <text:p text:style-name="P6">Cosam</text:p>
              </text:list-item>
              <text:list-item>
                <text:p text:style-name="P6">Addi</text:p>
              </text:list-item>
              <text:list-item>
                <text:p text:style-name="P6">Melchi</text:p>
              </text:list-item>
              <text:list-item>
                <text:p text:style-name="P6">Neri</text:p>
              </text:list-item>
              <text:list-item>
                <text:p text:style-name="P6">Salathiel</text:p>
              </text:list-item>
              <text:list-item>
                <text:p text:style-name="P6">Zorobabel</text:p>
              </text:list-item>
              <text:list-item>
                <text:p text:style-name="P6">Rhesa</text:p>
              </text:list-item>
              <text:list-item>
                <text:p text:style-name="P6">Joanna</text:p>
              </text:list-item>
              <text:list-item>
                <text:p text:style-name="P6">Juda</text:p>
              </text:list-item>
              <text:list-item>
                <text:p text:style-name="P6">Joseph</text:p>
              </text:list-item>
              <text:list-item>
                <text:p text:style-name="P6">Semei</text:p>
              </text:list-item>
              <text:list-item>
                <text:p text:style-name="P6">Mattathias</text:p>
              </text:list-item>
              <text:list-item>
                <text:p text:style-name="P6">Maath</text:p>
              </text:list-item>
              <text:list-item>
                <text:p text:style-name="P6">Nagge</text:p>
              </text:list-item>
              <text:list-item>
                <text:p text:style-name="P6">Esli</text:p>
              </text:list-item>
              <text:list-item>
                <text:p text:style-name="P6">Naum</text:p>
              </text:list-item>
              <text:list-item>
                <text:p text:style-name="P6">Amos</text:p>
              </text:list-item>
              <text:list-item>
                <text:p text:style-name="P6">Mattathias</text:p>
              </text:list-item>
              <text:list-item>
                <text:p text:style-name="P6">Joseph</text:p>
              </text:list-item>
              <text:list-item>
                <text:p text:style-name="P6">Janna</text:p>
              </text:list-item>
              <text:list-item>
                <text:p text:style-name="P6">Melchi</text:p>
              </text:list-item>
              <text:list-item>
                <text:p text:style-name="P6">Levi</text:p>
              </text:list-item>
              <text:list-item>
                <text:p text:style-name="P6">Matthat</text:p>
              </text:list-item>
              <text:list-item>
                <text:p text:style-name="P6">Heli</text:p>
              </text:list-item>
              <text:list-item>
                <text:p text:style-name="P6">Joseph</text:p>
              </text:list-item>
              <text:list-item>
                <text:p text:style-name="P6">Jesu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08:56:39.055000000</meta:creation-date>
    <dc:date>2026-07-11T12:30:26.034891023</dc:date>
    <meta:editing-duration>PT53M28S</meta:editing-duration>
    <meta:editing-cycles>36</meta:editing-cycles>
    <meta:generator>LibreOffice/26.2.4.2$Linux_X86_64 LibreOffice_project/64a984c51f4702dbd3710b13428c673a2f1292e7</meta:generator>
    <dc:title>Luke 3 reversed</dc:title>
    <meta:document-statistic meta:table-count="1" meta:image-count="0" meta:object-count="0" meta:page-count="1" meta:paragraph-count="93" meta:word-count="683" meta:character-count="3105" meta:non-whitespace-character-count="2592"/>
  </office:meta>
</office:document-meta>
</file>