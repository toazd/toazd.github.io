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7.9in" table:align="margins"/>
    </style:style>
    <style:style style:name="Table1.A" style:family="table-column">
      <style:table-column-properties style:column-width="3.95in" style:rel-column-width="32767*"/>
    </style:style>
    <style:style style:name="Table1.B" style:family="table-column">
      <style:table-column-properties style:column-width="3.95in" style:rel-column-width="32768*"/>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P1" style:family="paragraph" style:parent-style-name="Standard">
      <style:text-properties fo:font-weight="bold" officeooo:paragraph-rsid="001b6cc0" style:font-weight-asian="bold" style:font-weight-complex="bold"/>
    </style:style>
    <style:style style:name="P2" style:family="paragraph" style:parent-style-name="Standard">
      <style:text-properties officeooo:paragraph-rsid="001b6cc0"/>
    </style:style>
    <style:style style:name="P3" style:family="paragraph" style:parent-style-name="Standard" style:list-style-name="L1">
      <style:text-properties officeooo:rsid="001bbe1a" officeooo:paragraph-rsid="001bbe1a"/>
    </style:style>
    <style:style style:name="P4" style:family="paragraph" style:parent-style-name="Standard" style:list-style-name="L1">
      <style:text-properties officeooo:rsid="001d6feb" officeooo:paragraph-rsid="001d6feb"/>
    </style:style>
    <style:style style:name="P5" style:family="paragraph" style:parent-style-name="Standard">
      <style:text-properties officeooo:rsid="001bbe1a" officeooo:paragraph-rsid="001bbe1a"/>
    </style:style>
    <style:style style:name="P6" style:family="paragraph" style:parent-style-name="Standard">
      <style:text-properties officeooo:rsid="001de5a3" officeooo:paragraph-rsid="001de5a3"/>
    </style:style>
    <style:style style:name="T1" style:family="text">
      <style:text-properties officeooo:rsid="001b6cc0"/>
    </style:style>
    <style:style style:name="T2" style:family="text">
      <style:text-properties fo:font-style="normal" style:text-underline-style="solid" style:text-underline-width="auto" style:text-underline-color="font-color" style:font-style-asian="normal" style:font-style-complex="normal"/>
    </style:style>
    <style:style style:name="T3" style:family="text">
      <style:text-properties style:text-position="super 58%"/>
    </style:style>
    <style:style style:name="T4" style:family="text">
      <style:text-properties fo:font-weight="bold" style:font-weight-asian="bold" style:font-weight-complex="bold"/>
    </style:style>
    <style:style style:name="T5" style:family="text">
      <style:text-properties officeooo:rsid="001d6feb"/>
    </style:style>
    <style:style style:name="T6" style:family="text">
      <style:text-properties fo:color="#127622" loext:opacity="100%" officeooo:rsid="001d6feb"/>
    </style:style>
    <style:style style:name="T7" style:family="text">
      <style:text-properties fo:color="#127622" loext:opacity="100%"/>
    </style:style>
    <style:style style:name="T8" style:family="text">
      <style:text-properties fo:color="#ff0000" loext:opacity="100%"/>
    </style:style>
    <style:style style:name="T9" style:family="text">
      <style:text-properties fo:color="#ff0000" loext:opacity="100%" fo:font-weight="normal" fo:background-color="#ffff00" loext:char-shading-value="0" style:font-weight-asian="normal" style:font-weight-complex="normal"/>
    </style:style>
    <style:style style:name="T10" style:family="text">
      <style:text-properties fo:color="#ff0000" loext:opacity="100%" fo:background-color="#ffff00" loext:char-shading-value="0"/>
    </style:style>
    <style:style style:name="T11" style:family="text">
      <style:text-properties fo:color="#ff0000" loext:opacity="100%" fo:background-color="#ffffd7" loext:char-shading-value="0"/>
    </style:style>
    <style:style style:name="T12" style:family="text">
      <style:text-properties officeooo:rsid="00207a13"/>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1 Maccabees 1:5<text:span text:style-name="T1">4</text:span></text:p>
      <text:p text:style-name="P2">Now the fifteenth day of the month Casleu, in the hundred forty and fifth year, they set up the <text:span text:style-name="T2">abomination of desolation</text:span> upon the altar, and builded idol altars throughout the cities of Juda on every side;</text:p>
      <text:p text:style-name="P2"/>
      <text:list text:style-name="L1">
        <text:list-item>
          <text:p text:style-name="P3">The 145<text:span text:style-name="T3">th</text:span> year of the Selucid era lines up with <text:span text:style-name="T4">167BC</text:span> of the common era (312-145=167) <text:span text:style-name="T5">so these events occurred in the past relative to what Jesus spoke in </text:span><text:span text:style-name="T6">Matthew 24</text:span><text:span text:style-name="T5"> and </text:span><text:span text:style-name="T6">Mark 13</text:span><text:span text:style-name="T5">.</text:span></text:p>
        </text:list-item>
        <text:list-item>
          <text:p text:style-name="P4">The 2<text:span text:style-name="T3">nd</text:span> temple was destroyed in 70AD.</text:p>
        </text:list-item>
      </text:list>
      <text:p text:style-name="P5"/>
      <text:p text:style-name="P5">(Note: depending on whether the writer used the "Babylonian" spring start or the "Macedonian" autumn start for the calendar, the date can occasionally fluctuate by one year, but 167 BC is the universally accepted date for the desecration of the altar described in verse 54).</text:p>
      <text:p text:style-name="P5"/>
      <text:p text:style-name="P5"/>
      <table:table table:name="Table1" table:style-name="Table1">
        <table:table-column table:style-name="Table1.A"/>
        <table:table-column table:style-name="Table1.B"/>
        <table:table-row>
          <table:table-cell table:style-name="Table1.A1" office:value-type="string">
            <text:p text:style-name="Table_20_Contents"><text:span text:style-name="T7">Matthew 24:15-21</text:span><text:line-break/>15 <text:span text:style-name="T8">When </text:span><text:span text:style-name="T9">ye</text:span><text:span text:style-name="T10"> therefore shall see</text:span><text:span text:style-name="T8"> the </text:span><text:span text:style-name="T11">abomination of desolation</text:span><text:span text:style-name="T8">, spoken of by Daniel the prophet, stand in the holy place, (whoso readeth, let him understand:)</text:span><text:line-break/>16 <text:span text:style-name="T8">Then let them which be in Judaea flee into the mountains:</text:span><text:line-break/>17 <text:span text:style-name="T8">Let him which is on the housetop not come down to take any thing out of his house:</text:span><text:line-break/>18 <text:span text:style-name="T8">Neither let him which is in the field return back to take his clothes.</text:span><text:line-break/>19 <text:span text:style-name="T8">And woe unto them that are with child, and to them that give suck in those days!</text:span><text:line-break/>20 <text:span text:style-name="T8">But pray ye that your flight be not in the winter, neither on the sabbath day:</text:span><text:line-break/>21 <text:span text:style-name="T8">For then shall be great tribulation, such as was not since the beginning of the world to this time, no, nor ever shall be.</text:span></text:p>
          </table:table-cell>
          <table:table-cell table:style-name="Table1.B1" office:value-type="string">
            <text:p text:style-name="Table_20_Contents"><text:span text:style-name="T7">Mark 13:14-19</text:span><text:line-break/>14 <text:span text:style-name="T8">But when </text:span><text:span text:style-name="T10">ye shall see</text:span><text:span text:style-name="T8"> the </text:span><text:span text:style-name="T11">abomination of desolation</text:span><text:span text:style-name="T8">, spoken of by Daniel the prophet, standing where it ought not, (let him that readeth understand,) then let them that be in Judaea flee to the mountains:</text:span><text:line-break/>15 <text:span text:style-name="T8">And let him that is on the housetop not go down into the house, neither enter therein, to take any thing out of his house:</text:span><text:line-break/>16 <text:span text:style-name="T8">And let him that is in the field not turn back again for to take up his garment.</text:span><text:line-break/>17 <text:span text:style-name="T8">But woe to them that are with child, and to them that give suck in those days!</text:span><text:line-break/>18 <text:span text:style-name="T8">And pray ye that your flight be not in the winter.</text:span><text:line-break/>19 <text:span text:style-name="T8">For in those days shall be affliction, such as was not from the beginning of the creation which God created unto this time, neither shall be.</text:span></text:p>
          </table:table-cell>
        </table:table-row>
      </table:table>
      <text:p text:style-name="P5"/>
      <text:p text:style-name="P6"><text:span text:style-name="T7">Daniel 8:13</text:span> appears to be talking about the events surrounding Antiochus Epiphanes (the little horn of the 3<text:span text:style-name="T3">rd</text:span> beast) but it also is not what Jesus was talking about in <text:span text:style-name="T7">Mat 24</text:span> &amp; <text:span text:style-name="T7">Mar 13</text:span> because those events happened before the future events He spoke about <text:span text:style-name="T12">(in the future tense).</text:span></text:p>
      <text:p text:style-name="P6"/>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List_20_Heading" style:display-name="List Heading" style:family="paragraph" style:parent-style-name="Standard" style:next-style-name="List_20_Contents" style:class="html">
      <style:paragraph-properties fo:margin-left="0in"/>
    </style:style>
    <style:style style:name="List_20_Contents" style:display-name="List Contents" style:family="paragraph" style:parent-style-name="Standard" style:class="html">
      <style:paragraph-properties fo:margin-left="0.3937in"/>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3in" fo:margin-bottom="0.3in" fo:margin-left="0.3in" fo:margin-right="0.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21T08:49:24.899773800</meta:creation-date>
    <dc:title>default</dc:title>
    <meta:editing-duration>PT3H29M35S</meta:editing-duration>
    <meta:editing-cycles>10</meta:editing-cycles>
    <meta:generator>LibreOffice/26.2.4.2$Linux_X86_64 LibreOffice_project/64a984c51f4702dbd3710b13428c673a2f1292e7</meta:generator>
    <dc:date>2026-07-11T12:31:09.000770728</dc:date>
    <meta:document-statistic meta:table-count="1" meta:image-count="0" meta:object-count="0" meta:page-count="1" meta:paragraph-count="8" meta:word-count="453" meta:character-count="2388" meta:non-whitespace-character-count="1945"/>
    <meta:template xlink:type="simple" xlink:actuate="onRequest" xlink:title="default" xlink:href="../../../../../AppData/Roaming/LibreOffice/4/user/template/default.ott" meta:date="2026-01-21T08:49:23.800229100"/>
  </office:meta>
</office:document-meta>
</file>