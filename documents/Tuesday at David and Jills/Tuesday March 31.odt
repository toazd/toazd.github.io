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 style:writing-mode="lr-tb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 style:list-style-name="L1">
      <style:text-properties officeooo:rsid="001d30b9" officeooo:paragraph-rsid="001d30b9"/>
    </style:style>
    <style:style style:name="P2" style:family="paragraph" style:parent-style-name="Standard" style:list-style-name="L1">
      <style:text-properties officeooo:rsid="001d559e" officeooo:paragraph-rsid="001d559e"/>
    </style:style>
    <style:style style:name="P3" style:family="paragraph" style:parent-style-name="Standard" style:list-style-name="L1">
      <style:text-properties officeooo:rsid="001e8b40" officeooo:paragraph-rsid="001e8b40"/>
    </style:style>
    <style:style style:name="P4" style:family="paragraph" style:parent-style-name="Standard" style:list-style-name="L1">
      <style:paragraph-properties style:writing-mode="lr-tb" style:writing-mode-automatic="false"/>
      <style:text-properties officeooo:rsid="0020269a" officeooo:paragraph-rsid="0020269a"/>
    </style:style>
    <style:style style:name="P5" style:family="paragraph" style:parent-style-name="Standard" style:list-style-name="L1">
      <style:paragraph-properties style:writing-mode="lr-tb" style:writing-mode-automatic="false"/>
      <style:text-properties officeooo:rsid="0024dddc" officeooo:paragraph-rsid="0024dddc"/>
    </style:style>
    <style:style style:name="P6" style:family="paragraph" style:parent-style-name="Standard" style:list-style-name="L1">
      <style:paragraph-properties style:writing-mode="lr-tb" style:writing-mode-automatic="false"/>
      <style:text-properties officeooo:rsid="0025e865" officeooo:paragraph-rsid="0025e865"/>
    </style:style>
    <style:style style:name="P7" style:family="paragraph" style:parent-style-name="Standard" style:list-style-name="L1">
      <style:paragraph-properties style:writing-mode="lr-tb" style:writing-mode-automatic="false"/>
      <style:text-properties officeooo:rsid="002a31da" officeooo:paragraph-rsid="002a31da"/>
    </style:style>
    <style:style style:name="P8" style:family="paragraph" style:parent-style-name="Standard" style:list-style-name="L1">
      <style:paragraph-properties style:writing-mode="lr-tb" style:writing-mode-automatic="false"/>
      <style:text-properties officeooo:rsid="002b722c" officeooo:paragraph-rsid="002b722c"/>
    </style:style>
    <style:style style:name="P9" style:family="paragraph" style:parent-style-name="Standard" style:list-style-name="L1">
      <style:paragraph-properties style:writing-mode="lr-tb" style:writing-mode-automatic="false"/>
      <style:text-properties officeooo:rsid="002f8e89" officeooo:paragraph-rsid="002f8e89"/>
    </style:style>
    <style:style style:name="P10" style:family="paragraph" style:parent-style-name="Standard">
      <style:paragraph-properties style:writing-mode="lr-tb" style:writing-mode-automatic="false"/>
      <style:text-properties officeooo:rsid="002f8e89" officeooo:paragraph-rsid="002f8e89"/>
    </style:style>
    <style:style style:name="P11" style:family="paragraph" style:parent-style-name="Standard">
      <style:paragraph-properties style:writing-mode="lr-tb" style:writing-mode-automatic="false"/>
      <style:text-properties officeooo:rsid="002fab0e" officeooo:paragraph-rsid="002fab0e"/>
    </style:style>
    <style:style style:name="P12" style:family="paragraph" style:parent-style-name="Standard">
      <style:paragraph-properties style:writing-mode="lr-tb" style:writing-mode-automatic="false"/>
      <style:text-properties officeooo:rsid="00308fcf" officeooo:paragraph-rsid="00308fcf"/>
    </style:style>
    <style:style style:name="T1" style:family="text">
      <style:text-properties fo:color="#127622" loext:opacity="100%"/>
    </style:style>
    <style:style style:name="T2" style:family="text">
      <style:text-properties fo:color="#ff0000" loext:opacity="100%"/>
    </style:style>
    <style:style style:name="T3" style:family="text">
      <style:text-properties officeooo:rsid="001d559e"/>
    </style:style>
    <style:style style:name="T4" style:family="text">
      <style:text-properties officeooo:rsid="002362b0"/>
    </style:style>
    <style:style style:name="T5" style:family="text">
      <style:text-properties officeooo:rsid="0021ee84"/>
    </style:style>
    <style:style style:name="T6" style:family="text">
      <style:text-properties officeooo:rsid="0020f5c1"/>
    </style:style>
    <style:style style:name="T7" style:family="text">
      <style:text-properties officeooo:rsid="0029e58b"/>
    </style:style>
    <style:style style:name="T8" style:family="text">
      <style:text-properties officeooo:rsid="002d369a"/>
    </style:style>
    <style:style style:name="T9" style:family="text">
      <style:text-properties officeooo:rsid="002efd4c"/>
    </style:style>
    <style:style style:name="T10" style:family="text">
      <style:text-properties fo:color="#ff0000" loext:opacity="100%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hn 20:23</text:span><text:line-break/><text:span text:style-name="T2">Whose soever sins ye remit, they are remitted unto them; and whose soever sins ye retain, they are retained.</text:span></text:p>
          </table:table-cell>
        </table:table-row>
      </table:table>
      <text:p text:style-name="Standard"/>
      <text:list text:style-name="L1">
        <text:list-item>
          <text:p text:style-name="P1">Turned water into wine <text:span text:style-name="T3">(Cana)</text:span></text:p>
        </text:list-item>
        <text:list-item>
          <text:p text:style-name="P2">Raised multiple people from the dead (Lazarus, Jairus’ daughter, the widows’ son at Nain)</text:p>
        </text:list-item>
        <text:list-item>
          <text:p text:style-name="P3">Fed over 5000 people with 5 loaves and 2 fishes.</text:p>
        </text:list-item>
        <text:list-item>
          <text:p text:style-name="P3">Fed over 4000 people with 7 loaves and a few fishes.</text:p>
        </text:list-item>
        <text:list-item>
          <text:p text:style-name="P4">Calmed the wind and the sea on Galilee (Matthew 8:23-27; Mark 4:35-41; Luke 8:22-25).</text:p>
        </text:list-item>
        <text:list-item>
          <text:p text:style-name="P4">Walked on water (Matthew 14:22-33; Mark 6:45-52; John 6:16-21).</text:p>
        </text:list-item>
        <text:list-item>
          <text:p text:style-name="P4">Twice He caused the disciples to catch <text:span text:style-name="T4">a large</text:span> amount of fish (Luke 5:1-11 <text:span text:style-name="T5">2 ships full</text:span>; John 21:1-11 <text:span text:style-name="T6">153</text:span>).</text:p>
        </text:list-item>
        <text:list-item>
          <text:p text:style-name="P5">He cursed the fig tree and it straightway withered (Matthew 21:18-22; Mark 11:12-14, 20-24).</text:p>
        </text:list-item>
        <text:list-item>
          <text:p text:style-name="P6"><text:span text:style-name="T7">The first fish that bit Peter’s hook had </text:span>tribute money <text:span text:style-name="T7">in its mouth</text:span> (Matthew 17:24-27).</text:p>
        </text:list-item>
        <text:list-item>
          <text:p text:style-name="P7">He healed leprosy, blindness, paralysis, chronic diseases, and physical infirmities.</text:p>
        </text:list-item>
        <text:list-item>
          <text:p text:style-name="P8">He cast out demons from multiple people in the Gadarenes and the Gergesenes, <text:span text:style-name="T8">the syrophenician’s daughter, and the blind and mute </text:span><text:span text:style-name="T9">man</text:span><text:span text:style-name="T8">.</text:span></text:p>
        </text:list-item>
        <text:list-item>
          <text:p text:style-name="P9">He reattached and healed the ear of Malchus, the servant of the high priest, whom Peter had cut off.</text:p>
        </text:list-item>
      </text:list>
      <text:p text:style-name="P10"/>
      <text:p text:style-name="P11">And the very last verse of the book of John reads: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John 21:25</text:span><text:line-break/>And there are also many other things which Jesus did, the which, if they should be written every one, I suppose that even the world itself could not contain the books that should be written. Amen.</text:p>
          </table:table-cell>
        </table:table-row>
      </table:table>
      <text:p text:style-name="P11"/>
      <text:p text:style-name="P12">Go to <text:span text:style-name="T1">John 14:12</text:span>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John 14:12</text:span><text:line-break/><text:span text:style-name="T2">Verily, verily, I say unto you, He that believeth on me, </text:span><text:span text:style-name="T10">the works that I do shall he do also</text:span><text:span text:style-name="T2">; and </text:span><text:span text:style-name="T10">greater works than these shall he do</text:span><text:span text:style-name="T2">; because I go unto my Father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09:31:51.764722900</meta:creation-date>
    <dc:title>default</dc:title>
    <meta:editing-duration>PT41M</meta:editing-duration>
    <meta:editing-cycles>22</meta:editing-cycles>
    <meta:generator>LibreOffice/26.2.4.2$Linux_X86_64 LibreOffice_project/64a984c51f4702dbd3710b13428c673a2f1292e7</meta:generator>
    <dc:date>2026-07-11T12:20:43.830554980</dc:date>
    <meta:document-statistic meta:table-count="3" meta:image-count="0" meta:object-count="0" meta:page-count="1" meta:paragraph-count="17" meta:word-count="285" meta:character-count="1550" meta:non-whitespace-character-count="1294"/>
    <meta:template xlink:type="simple" xlink:actuate="onRequest" xlink:title="default" xlink:href="../../AppData/Roaming/LibreOffice/4/user/template/default1.ott" meta:date="2026-03-30T09:31:50.230081300"/>
  </office:meta>
</office:document-meta>
</file>