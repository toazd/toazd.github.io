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0000003206E6F2DB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1" style:family="table-row">
      <style:table-row-properties fo:keep-together="auto"/>
    </style:style>
    <style:style style:name="Table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11" style:family="table">
      <style:table-properties style:width="7.9in" table:align="margins"/>
    </style:style>
    <style:style style:name="Table11.A" style:family="table-column">
      <style:table-column-properties style:column-width="7.9in" style:rel-column-width="65535*"/>
    </style:style>
    <style:style style:name="Table11.A1" style:family="table-cell">
      <style:table-cell-properties fo:padding="0.0382in" fo:border="0.5pt solid #000000"/>
    </style:style>
    <style:style style:name="Table12" style:family="table">
      <style:table-properties style:width="7.9in" table:align="margins"/>
    </style:style>
    <style:style style:name="Table12.A" style:family="table-column">
      <style:table-column-properties style:column-width="7.9in" style:rel-column-width="65535*"/>
    </style:style>
    <style:style style:name="Table12.A1" style:family="table-cell">
      <style:table-cell-properties fo:padding="0.0382in" fo:border="0.5pt solid #000000"/>
    </style:style>
    <style:style style:name="P1" style:family="paragraph" style:parent-style-name="Standard">
      <style:paragraph-properties fo:text-align="center" style:justify-single-word="false"/>
      <style:text-properties fo:font-size="14pt" officeooo:paragraph-rsid="001ae68c" style:font-size-asian="14pt" style:font-size-complex="14pt"/>
    </style:style>
    <style:style style:name="P2" style:family="paragraph" style:parent-style-name="Standard">
      <style:paragraph-properties fo:text-align="center" style:justify-single-word="false"/>
    </style:style>
    <style:style style:name="P3" style:family="paragraph" style:parent-style-name="Caption">
      <style:text-properties fo:font-size="10pt" style:font-size-asian="10pt" style:font-size-complex="10pt"/>
    </style:style>
    <style:style style:name="P4" style:family="paragraph" style:parent-style-name="Standard">
      <style:text-properties officeooo:paragraph-rsid="001b6569"/>
    </style:style>
    <style:style style:name="P5" style:family="paragraph" style:parent-style-name="Standard">
      <style:text-properties officeooo:rsid="001b6569" officeooo:paragraph-rsid="001b6569"/>
    </style:style>
    <style:style style:name="P6" style:family="paragraph" style:parent-style-name="Standard">
      <style:text-properties officeooo:paragraph-rsid="001e342d"/>
    </style:style>
    <style:style style:name="P7" style:family="paragraph" style:parent-style-name="Standard">
      <style:text-properties officeooo:rsid="001e342d" officeooo:paragraph-rsid="001e342d"/>
    </style:style>
    <style:style style:name="P8" style:family="paragraph" style:parent-style-name="Standard">
      <style:text-properties officeooo:paragraph-rsid="01481ffd"/>
    </style:style>
    <style:style style:name="P9" style:family="paragraph" style:parent-style-name="Standard">
      <style:text-properties officeooo:paragraph-rsid="0049311e"/>
    </style:style>
    <style:style style:name="P10" style:family="paragraph" style:parent-style-name="Standard">
      <style:text-properties officeooo:rsid="0049311e" officeooo:paragraph-rsid="0049311e"/>
    </style:style>
    <style:style style:name="P11" style:family="paragraph" style:parent-style-name="Table_20_Contents">
      <style:text-properties fo:font-weight="bold" officeooo:paragraph-rsid="004d411c" style:font-weight-asian="bold" style:font-weight-complex="bold"/>
    </style:style>
    <style:style style:name="P12" style:family="paragraph" style:parent-style-name="Table_20_Contents">
      <style:text-properties officeooo:paragraph-rsid="004d411c"/>
    </style:style>
    <style:style style:name="P13" style:family="paragraph" style:parent-style-name="Standard">
      <style:text-properties officeooo:paragraph-rsid="004d411c"/>
    </style:style>
    <style:style style:name="P14" style:family="paragraph" style:parent-style-name="Standard">
      <style:text-properties officeooo:paragraph-rsid="005d32dd"/>
    </style:style>
    <style:style style:name="P15" style:family="paragraph" style:parent-style-name="Standard">
      <style:paragraph-properties fo:text-align="center" style:justify-single-word="false"/>
      <style:text-properties style:font-name="Gabriela" fo:font-size="14pt" officeooo:rsid="010363d2" officeooo:paragraph-rsid="014f3de2" style:font-size-asian="14pt" style:font-size-complex="14pt"/>
    </style:style>
    <style:style style:name="P16" style:family="paragraph" style:parent-style-name="Standard">
      <style:paragraph-properties fo:text-align="center" style:justify-single-word="false"/>
      <style:text-properties style:font-name="Gabriela" fo:font-size="12pt" officeooo:rsid="010363d2" officeooo:paragraph-rsid="014f3de2" style:font-size-asian="12pt" style:font-size-complex="12pt"/>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weight="normal" style:font-weight-asian="normal" style:font-weight-complex="normal"/>
    </style:style>
    <style:style style:name="P19" style:family="paragraph" style:parent-style-name="Standard">
      <style:text-properties officeooo:rsid="006b8726" officeooo:paragraph-rsid="006b8726"/>
    </style:style>
    <style:style style:name="P20" style:family="paragraph" style:parent-style-name="Standard" style:list-style-name="L1">
      <style:text-properties officeooo:rsid="006b8726" officeooo:paragraph-rsid="006b8726"/>
    </style:style>
    <style:style style:name="P21" style:family="paragraph" style:parent-style-name="Standard" style:list-style-name="L1">
      <style:text-properties officeooo:rsid="006d5077" officeooo:paragraph-rsid="006d5077"/>
    </style:style>
    <style:style style:name="P22" style:family="paragraph" style:parent-style-name="Standard" style:list-style-name="L1">
      <style:text-properties officeooo:paragraph-rsid="006d5077"/>
    </style:style>
    <style:style style:name="P23" style:family="paragraph" style:parent-style-name="Standard">
      <style:text-properties officeooo:rsid="006d5077" officeooo:paragraph-rsid="006d5077"/>
    </style:style>
    <style:style style:name="P24" style:family="paragraph" style:parent-style-name="Standard" style:list-style-name="L2">
      <style:text-properties officeooo:rsid="006e684b" officeooo:paragraph-rsid="006e684b"/>
    </style:style>
    <style:style style:name="P25" style:family="paragraph" style:parent-style-name="Standard" style:list-style-name="L2">
      <style:text-properties officeooo:rsid="006ec020" officeooo:paragraph-rsid="006ec020"/>
    </style:style>
    <style:style style:name="P26" style:family="paragraph" style:parent-style-name="Standard" style:list-style-name="L2">
      <style:text-properties officeooo:rsid="006f40e3" officeooo:paragraph-rsid="006f40e3"/>
    </style:style>
    <style:style style:name="P27" style:family="paragraph" style:parent-style-name="Standard" style:list-style-name="L2"/>
    <style:style style:name="P28" style:family="paragraph" style:parent-style-name="Standard" style:list-style-name="L2">
      <style:text-properties officeooo:rsid="00710b6a" officeooo:paragraph-rsid="00710b6a"/>
    </style:style>
    <style:style style:name="P29" style:family="paragraph" style:parent-style-name="Standard" style:list-style-name="L2">
      <style:text-properties officeooo:rsid="0071c04f" officeooo:paragraph-rsid="0071c04f"/>
    </style:style>
    <style:style style:name="P30" style:family="paragraph" style:parent-style-name="Standard">
      <style:text-properties officeooo:rsid="0071c04f" officeooo:paragraph-rsid="0071c04f"/>
    </style:style>
    <style:style style:name="P31" style:family="paragraph" style:parent-style-name="Standard">
      <style:text-properties officeooo:rsid="00729e62" officeooo:paragraph-rsid="00738743"/>
    </style:style>
    <style:style style:name="P32" style:family="paragraph" style:parent-style-name="Standard">
      <style:text-properties officeooo:rsid="00729e62" officeooo:paragraph-rsid="00729e62"/>
    </style:style>
    <style:style style:name="P33" style:family="paragraph" style:parent-style-name="Standard" style:list-style-name="L3">
      <style:text-properties officeooo:rsid="007fb244" officeooo:paragraph-rsid="007fb244"/>
    </style:style>
    <style:style style:name="P34" style:family="paragraph" style:parent-style-name="Standard">
      <style:text-properties officeooo:rsid="007fb244" officeooo:paragraph-rsid="007fb244"/>
    </style:style>
    <style:style style:name="P35" style:family="paragraph" style:parent-style-name="Standard">
      <style:text-properties officeooo:paragraph-rsid="00826257"/>
    </style:style>
    <style:style style:name="P36" style:family="paragraph" style:parent-style-name="Standard">
      <style:text-properties officeooo:rsid="00826257" officeooo:paragraph-rsid="00826257"/>
    </style:style>
    <style:style style:name="P37" style:family="paragraph" style:parent-style-name="Standard">
      <style:text-properties officeooo:paragraph-rsid="00845464"/>
    </style:style>
    <style:style style:name="P38" style:family="paragraph" style:parent-style-name="Standard">
      <style:text-properties officeooo:rsid="002ca9a1" officeooo:paragraph-rsid="00845464"/>
    </style:style>
    <style:style style:name="P39" style:family="paragraph" style:parent-style-name="Standard" style:list-style-name="L4">
      <style:text-properties officeooo:rsid="008b2edb" officeooo:paragraph-rsid="008b2edb"/>
    </style:style>
    <style:style style:name="P40" style:family="paragraph" style:parent-style-name="Standard" style:list-style-name="L4">
      <style:text-properties officeooo:rsid="008f902a" officeooo:paragraph-rsid="008f902a"/>
    </style:style>
    <style:style style:name="P41" style:family="paragraph" style:parent-style-name="Standard" style:list-style-name="L4">
      <style:text-properties officeooo:rsid="008d9212" officeooo:paragraph-rsid="008d9212"/>
    </style:style>
    <style:style style:name="P42" style:family="paragraph" style:parent-style-name="Standard">
      <style:text-properties officeooo:rsid="008d9212" officeooo:paragraph-rsid="008d9212"/>
    </style:style>
    <style:style style:name="P43" style:family="paragraph" style:parent-style-name="Standard">
      <style:text-properties officeooo:paragraph-rsid="00951324"/>
    </style:style>
    <style:style style:name="P44" style:family="paragraph" style:parent-style-name="Standard">
      <style:text-properties officeooo:rsid="00970d68" officeooo:paragraph-rsid="00970d68"/>
    </style:style>
    <style:style style:name="P45" style:family="paragraph" style:parent-style-name="Standard" style:list-style-name="L5"/>
    <style:style style:name="P46" style:family="paragraph" style:parent-style-name="Standard">
      <style:text-properties officeooo:paragraph-rsid="01297b70"/>
    </style:style>
    <style:style style:name="P47" style:family="paragraph" style:parent-style-name="Standard">
      <style:text-properties officeooo:rsid="00970d68" officeooo:paragraph-rsid="00c01fc5"/>
    </style:style>
    <style:style style:name="P48" style:family="paragraph" style:parent-style-name="Standard">
      <style:text-properties officeooo:rsid="00dab6a3" officeooo:paragraph-rsid="00dab6a3"/>
    </style:style>
    <style:style style:name="P49" style:family="paragraph" style:parent-style-name="Table_20_Contents">
      <style:text-properties fo:font-weight="bold" officeooo:paragraph-rsid="00dab6a3" style:font-weight-asian="bold" style:font-weight-complex="bold"/>
    </style:style>
    <style:style style:name="P50" style:family="paragraph" style:parent-style-name="Table_20_Contents">
      <style:text-properties fo:font-weight="normal" officeooo:paragraph-rsid="00dab6a3" style:font-weight-asian="normal" style:font-weight-complex="normal"/>
    </style:style>
    <style:style style:name="P51" style:family="paragraph" style:parent-style-name="Table_20_Contents">
      <style:text-properties officeooo:paragraph-rsid="00dab6a3"/>
    </style:style>
    <style:style style:name="P52" style:family="paragraph" style:parent-style-name="Table_20_Contents">
      <style:text-properties fo:font-weight="bold" officeooo:paragraph-rsid="00e4b123" style:font-weight-asian="bold" style:font-weight-complex="bold"/>
    </style:style>
    <style:style style:name="P53" style:family="paragraph" style:parent-style-name="Table_20_Contents">
      <style:text-properties fo:font-weight="normal" officeooo:paragraph-rsid="00e4b123" style:font-weight-asian="normal" style:font-weight-complex="normal"/>
    </style:style>
    <style:style style:name="P54" style:family="paragraph" style:parent-style-name="Standard">
      <style:text-properties officeooo:rsid="00dc6ec8" officeooo:paragraph-rsid="00e4b123"/>
    </style:style>
    <style:style style:name="P55" style:family="paragraph" style:parent-style-name="Standard">
      <style:text-properties officeooo:rsid="00e2ada7" officeooo:paragraph-rsid="00e2ada7"/>
    </style:style>
    <style:style style:name="P56" style:family="paragraph" style:parent-style-name="Standard">
      <style:text-properties officeooo:rsid="00e8d4a9" officeooo:paragraph-rsid="00e8d4a9"/>
    </style:style>
    <style:style style:name="P57" style:family="paragraph" style:parent-style-name="Standard">
      <style:text-properties officeooo:rsid="00f4c4a3" officeooo:paragraph-rsid="013861d6"/>
    </style:style>
    <style:style style:name="P58" style:family="paragraph" style:parent-style-name="Standard" style:list-style-name="L6">
      <style:text-properties officeooo:rsid="013861d6" officeooo:paragraph-rsid="0161af2d"/>
    </style:style>
    <style:style style:name="P59" style:family="paragraph" style:parent-style-name="Standard">
      <style:text-properties officeooo:rsid="01403d1a" officeooo:paragraph-rsid="01403d1a"/>
    </style:style>
    <style:style style:name="P60" style:family="paragraph" style:parent-style-name="Standard">
      <style:text-properties officeooo:rsid="00f4c4a3" officeooo:paragraph-rsid="01455e71"/>
    </style:style>
    <style:style style:name="P61" style:family="paragraph" style:parent-style-name="Standard">
      <style:text-properties officeooo:rsid="00f5cdc9" officeooo:paragraph-rsid="01455e71"/>
    </style:style>
    <style:style style:name="T1" style:family="text">
      <style:text-properties style:font-name="Gabriela" officeooo:rsid="00618b9e"/>
    </style:style>
    <style:style style:name="T2" style:family="text">
      <style:text-properties style:font-name="Gabriela" officeooo:rsid="006245aa"/>
    </style:style>
    <style:style style:name="T3" style:family="text">
      <style:text-properties style:font-name="Gabriela" fo:font-size="18pt" fo:font-weight="bold" officeooo:rsid="001b6569" style:font-size-asian="18pt" style:font-weight-asian="bold" style:font-size-complex="18pt" style:font-weight-complex="bold"/>
    </style:style>
    <style:style style:name="T4" style:family="text">
      <style:text-properties officeooo:rsid="001b6569"/>
    </style:style>
    <style:style style:name="T5" style:family="text">
      <style:text-properties officeooo:rsid="009fb88f"/>
    </style:style>
    <style:style style:name="T6" style:family="text">
      <style:text-properties officeooo:rsid="00642e08"/>
    </style:style>
    <style:style style:name="T7" style:family="text">
      <style:text-properties officeooo:rsid="001e342d"/>
    </style:style>
    <style:style style:name="T8" style:family="text">
      <style:text-properties fo:font-weight="bold" officeooo:rsid="001b6569" style:font-weight-asian="bold" style:font-weight-complex="bold"/>
    </style:style>
    <style:style style:name="T9" style:family="text">
      <style:text-properties officeooo:rsid="003aef8b"/>
    </style:style>
    <style:style style:name="T10" style:family="text">
      <style:text-properties officeooo:rsid="001bb7be"/>
    </style:style>
    <style:style style:name="T11" style:family="text">
      <style:text-properties fo:font-weight="bold" officeooo:rsid="001bb7be" style:font-weight-asian="bold" style:font-weight-complex="bold"/>
    </style:style>
    <style:style style:name="T12" style:family="text">
      <style:text-properties officeooo:rsid="001c8d21"/>
    </style:style>
    <style:style style:name="T13" style:family="text">
      <style:text-properties officeooo:rsid="002365b5"/>
    </style:style>
    <style:style style:name="T14" style:family="text">
      <style:text-properties style:text-position="super 58%" officeooo:rsid="001e342d"/>
    </style:style>
    <style:style style:name="T15" style:family="text">
      <style:text-properties officeooo:rsid="00a451fa"/>
    </style:style>
    <style:style style:name="T16" style:family="text">
      <style:text-properties officeooo:rsid="002073d7"/>
    </style:style>
    <style:style style:name="T17" style:family="text">
      <style:text-properties officeooo:rsid="0021f866"/>
    </style:style>
    <style:style style:name="T18" style:family="text">
      <style:text-properties officeooo:rsid="00216805"/>
    </style:style>
    <style:style style:name="T19" style:family="text">
      <style:text-properties fo:font-weight="bold" officeooo:rsid="00216805" style:font-weight-asian="bold" style:font-weight-complex="bold"/>
    </style:style>
    <style:style style:name="T20" style:family="text">
      <style:text-properties officeooo:rsid="002230fb"/>
    </style:style>
    <style:style style:name="T21" style:family="text">
      <style:text-properties fo:font-weight="bold" officeooo:rsid="002230fb" style:font-weight-asian="bold" style:font-weight-complex="bold"/>
    </style:style>
    <style:style style:name="T22" style:family="text">
      <style:text-properties officeooo:rsid="002722e6"/>
    </style:style>
    <style:style style:name="T23" style:family="text">
      <style:text-properties officeooo:rsid="0028ed5c"/>
    </style:style>
    <style:style style:name="T24" style:family="text">
      <style:text-properties fo:font-weight="bold" officeooo:rsid="0028ed5c" style:font-weight-asian="bold" style:font-weight-complex="bold"/>
    </style:style>
    <style:style style:name="T25" style:family="text">
      <style:text-properties officeooo:rsid="002b373c"/>
    </style:style>
    <style:style style:name="T26" style:family="text">
      <style:text-properties officeooo:rsid="00644f55"/>
    </style:style>
    <style:style style:name="T27" style:family="text">
      <style:text-properties officeooo:rsid="00645172"/>
    </style:style>
    <style:style style:name="T28" style:family="text">
      <style:text-properties fo:font-weight="bold" officeooo:rsid="002b373c" style:font-weight-asian="bold" style:font-weight-complex="bold"/>
    </style:style>
    <style:style style:name="T29" style:family="text">
      <style:text-properties officeooo:rsid="002ca9a1"/>
    </style:style>
    <style:style style:name="T30" style:family="text">
      <style:text-properties fo:font-weight="bold" officeooo:rsid="002ca9a1" style:font-weight-asian="bold" style:font-weight-complex="bold"/>
    </style:style>
    <style:style style:name="T31" style:family="text">
      <style:text-properties fo:font-weight="bold" officeooo:rsid="01481ffd" style:font-weight-asian="bold" style:font-weight-complex="bold"/>
    </style:style>
    <style:style style:name="T32" style:family="text">
      <style:text-properties officeooo:rsid="002e934e"/>
    </style:style>
    <style:style style:name="T33" style:family="text">
      <style:text-properties officeooo:rsid="002f9394"/>
    </style:style>
    <style:style style:name="T34" style:family="text">
      <style:text-properties officeooo:rsid="0100f09c"/>
    </style:style>
    <style:style style:name="T35" style:family="text">
      <style:text-properties fo:font-weight="bold" officeooo:rsid="002e934e" style:font-weight-asian="bold" style:font-weight-complex="bold"/>
    </style:style>
    <style:style style:name="T36" style:family="text">
      <style:text-properties officeooo:rsid="003f63a5"/>
    </style:style>
    <style:style style:name="T37" style:family="text">
      <style:text-properties officeooo:rsid="004096bd"/>
    </style:style>
    <style:style style:name="T38" style:family="text">
      <style:text-properties officeooo:rsid="003115a4"/>
    </style:style>
    <style:style style:name="T39" style:family="text">
      <style:text-properties style:text-position="super 58%" officeooo:rsid="003115a4"/>
    </style:style>
    <style:style style:name="T40" style:family="text">
      <style:text-properties officeooo:rsid="0036b72b"/>
    </style:style>
    <style:style style:name="T41" style:family="text">
      <style:text-properties fo:font-weight="bold" officeooo:rsid="0036b72b" style:font-weight-asian="bold" style:font-weight-complex="bold"/>
    </style:style>
    <style:style style:name="T42" style:family="text">
      <style:text-properties officeooo:rsid="00a5f58b"/>
    </style:style>
    <style:style style:name="T43" style:family="text">
      <style:text-properties officeooo:rsid="003d1f75"/>
    </style:style>
    <style:style style:name="T44" style:family="text">
      <style:text-properties officeooo:rsid="003b85ac"/>
    </style:style>
    <style:style style:name="T45" style:family="text">
      <style:text-properties officeooo:rsid="004b9cf2"/>
    </style:style>
    <style:style style:name="T46" style:family="text">
      <style:text-properties style:font-name="Gabriela" fo:font-size="18pt" officeooo:rsid="0049311e" style:font-size-asian="18pt" style:font-size-complex="18pt"/>
    </style:style>
    <style:style style:name="T47" style:family="text">
      <style:text-properties officeooo:rsid="0049311e"/>
    </style:style>
    <style:style style:name="T48" style:family="text">
      <style:text-properties style:text-position="super 58%" officeooo:rsid="0049311e"/>
    </style:style>
    <style:style style:name="T49" style:family="text">
      <style:text-properties officeooo:rsid="00a70004"/>
    </style:style>
    <style:style style:name="T50" style:family="text">
      <style:text-properties style:text-position="super 58%"/>
    </style:style>
    <style:style style:name="T51" style:family="text">
      <style:text-properties fo:font-weight="bold" style:font-weight-asian="bold" style:font-weight-complex="bold"/>
    </style:style>
    <style:style style:name="T52" style:family="text">
      <style:text-properties style:font-name="Gabriela" fo:font-size="18pt" officeooo:rsid="005d32dd" style:font-size-asian="18pt" style:font-size-complex="18pt"/>
    </style:style>
    <style:style style:name="T53" style:family="text">
      <style:text-properties officeooo:rsid="005d32dd"/>
    </style:style>
    <style:style style:name="T54" style:family="text">
      <style:text-properties officeooo:rsid="006811d8"/>
    </style:style>
    <style:style style:name="T55" style:family="text">
      <style:text-properties officeooo:rsid="005db22a"/>
    </style:style>
    <style:style style:name="T56" style:family="text">
      <style:text-properties officeooo:rsid="005df594"/>
    </style:style>
    <style:style style:name="T57" style:family="text">
      <style:text-properties officeooo:rsid="005ec079"/>
    </style:style>
    <style:style style:name="T58" style:family="text">
      <style:text-properties fo:font-weight="bold" officeooo:rsid="005db22a" style:font-weight-asian="bold" style:font-weight-complex="bold"/>
    </style:style>
    <style:style style:name="T59" style:family="text">
      <style:text-properties officeooo:rsid="006a3b2a"/>
    </style:style>
    <style:style style:name="T60" style:family="text">
      <style:text-properties officeooo:rsid="014f3de2"/>
    </style:style>
    <style:style style:name="T61" style:family="text">
      <style:text-properties officeooo:rsid="014efb95"/>
    </style:style>
    <style:style style:name="T62" style:family="text">
      <style:text-properties fo:font-weight="bold" officeooo:rsid="0056c0e2" style:font-weight-asian="bold" style:font-weight-complex="bold"/>
    </style:style>
    <style:style style:name="T63" style:family="text">
      <style:text-properties officeooo:rsid="01045232"/>
    </style:style>
    <style:style style:name="T64" style:family="text">
      <style:text-properties officeooo:rsid="00aa8174"/>
    </style:style>
    <style:style style:name="T65" style:family="text">
      <style:text-properties style:text-position="super 58%" officeooo:rsid="00aa8174"/>
    </style:style>
    <style:style style:name="T66" style:family="text">
      <style:text-properties fo:font-weight="bold" officeooo:rsid="00aa8174" style:font-weight-asian="bold" style:font-weight-complex="bold"/>
    </style:style>
    <style:style style:name="T67" style:family="text">
      <style:text-properties officeooo:rsid="0148584b"/>
    </style:style>
    <style:style style:name="T68" style:family="text">
      <style:text-properties style:text-position="super 58%" fo:font-weight="bold" style:font-weight-asian="bold" style:font-weight-complex="bold"/>
    </style:style>
    <style:style style:name="T69" style:family="text">
      <style:text-properties officeooo:rsid="006d5077"/>
    </style:style>
    <style:style style:name="T70" style:family="text">
      <style:text-properties officeooo:rsid="014c02ea"/>
    </style:style>
    <style:style style:name="T71" style:family="text">
      <style:text-properties officeooo:rsid="014de698"/>
    </style:style>
    <style:style style:name="T72" style:family="text">
      <style:text-properties fo:font-style="italic" officeooo:rsid="014de698" style:font-style-asian="italic" style:font-style-complex="italic"/>
    </style:style>
    <style:style style:name="T73" style:family="text">
      <style:text-properties officeooo:rsid="010705b1"/>
    </style:style>
    <style:style style:name="T74" style:family="text">
      <style:text-properties officeooo:rsid="01061188"/>
    </style:style>
    <style:style style:name="T75" style:family="text">
      <style:text-properties style:text-position="super 58%" officeooo:rsid="01061188"/>
    </style:style>
    <style:style style:name="T76" style:family="text">
      <style:text-properties officeooo:rsid="0151e32f"/>
    </style:style>
    <style:style style:name="T77" style:family="text">
      <style:text-properties officeooo:rsid="006ff453"/>
    </style:style>
    <style:style style:name="T78" style:family="text">
      <style:text-properties fo:font-weight="bold" officeooo:rsid="006ff453" style:font-weight-asian="bold" style:font-weight-complex="bold"/>
    </style:style>
    <style:style style:name="T79" style:family="text">
      <style:text-properties fo:font-weight="bold" officeooo:rsid="0071c04f" style:font-weight-asian="bold" style:font-weight-complex="bold"/>
    </style:style>
    <style:style style:name="T80" style:family="text">
      <style:text-properties style:text-position="super 58%" fo:font-weight="bold" officeooo:rsid="0071c04f" style:font-weight-asian="bold" style:font-weight-complex="bold"/>
    </style:style>
    <style:style style:name="T81" style:family="text">
      <style:text-properties officeooo:rsid="0071c04f"/>
    </style:style>
    <style:style style:name="T82" style:family="text">
      <style:text-properties officeooo:rsid="00738743"/>
    </style:style>
    <style:style style:name="T83" style:family="text">
      <style:text-properties officeooo:rsid="00ad5dc3"/>
    </style:style>
    <style:style style:name="T84" style:family="text">
      <style:text-properties officeooo:rsid="00ae022f"/>
    </style:style>
    <style:style style:name="T85" style:family="text">
      <style:text-properties officeooo:rsid="007f84bc"/>
    </style:style>
    <style:style style:name="T86" style:family="text">
      <style:text-properties fo:font-weight="bold" officeooo:rsid="007f84bc" style:font-weight-asian="bold" style:font-weight-complex="bold"/>
    </style:style>
    <style:style style:name="T87" style:family="text">
      <style:text-properties officeooo:rsid="00ae5c3c"/>
    </style:style>
    <style:style style:name="T88" style:family="text">
      <style:text-properties fo:font-weight="bold" officeooo:rsid="00738743" style:font-weight-asian="bold" style:font-weight-complex="bold"/>
    </style:style>
    <style:style style:name="T89" style:family="text">
      <style:text-properties officeooo:rsid="00826257"/>
    </style:style>
    <style:style style:name="T90" style:family="text">
      <style:text-properties fo:font-weight="bold" officeooo:rsid="00826257" style:font-weight-asian="bold" style:font-weight-complex="bold"/>
    </style:style>
    <style:style style:name="T91" style:family="text">
      <style:text-properties officeooo:rsid="0083bda9"/>
    </style:style>
    <style:style style:name="T92" style:family="text">
      <style:text-properties officeooo:rsid="00afb3ea"/>
    </style:style>
    <style:style style:name="T93" style:family="text">
      <style:text-properties fo:font-weight="bold" officeooo:rsid="00845464" style:font-weight-asian="bold" style:font-weight-complex="bold"/>
    </style:style>
    <style:style style:name="T94" style:family="text">
      <style:text-properties officeooo:rsid="00afd7a0"/>
    </style:style>
    <style:style style:name="T95" style:family="text">
      <style:text-properties fo:font-weight="bold" officeooo:rsid="00afd7a0" style:font-weight-asian="bold" style:font-weight-complex="bold"/>
    </style:style>
    <style:style style:name="T96" style:family="text">
      <style:text-properties fo:font-weight="normal" officeooo:rsid="00afd7a0" style:font-weight-asian="normal" style:font-weight-complex="normal"/>
    </style:style>
    <style:style style:name="T97" style:family="text">
      <style:text-properties fo:font-weight="normal" officeooo:rsid="0107e5f2" style:font-weight-asian="normal" style:font-weight-complex="normal"/>
    </style:style>
    <style:style style:name="T98" style:family="text">
      <style:text-properties fo:font-weight="normal" officeooo:rsid="010853e4" style:font-weight-asian="normal" style:font-weight-complex="normal"/>
    </style:style>
    <style:style style:name="T99" style:family="text">
      <style:text-properties fo:font-weight="bold" officeooo:rsid="0088ceb2" style:font-weight-asian="bold" style:font-weight-complex="bold"/>
    </style:style>
    <style:style style:name="T100" style:family="text">
      <style:text-properties fo:font-weight="bold" officeooo:rsid="0085c4f3" style:font-weight-asian="bold" style:font-weight-complex="bold"/>
    </style:style>
    <style:style style:name="T101" style:family="text">
      <style:text-properties fo:font-weight="bold" officeooo:rsid="008b6342" style:font-weight-asian="bold" style:font-weight-complex="bold"/>
    </style:style>
    <style:style style:name="T102" style:family="text">
      <style:text-properties officeooo:rsid="00b527d5"/>
    </style:style>
    <style:style style:name="T103" style:family="text">
      <style:text-properties officeooo:rsid="008fea02"/>
    </style:style>
    <style:style style:name="T104" style:family="text">
      <style:text-properties officeooo:rsid="0090d194"/>
    </style:style>
    <style:style style:name="T105" style:family="text">
      <style:text-properties officeooo:rsid="00921e34"/>
    </style:style>
    <style:style style:name="T106" style:family="text">
      <style:text-properties officeooo:rsid="010af452"/>
    </style:style>
    <style:style style:name="T107" style:family="text">
      <style:text-properties officeooo:rsid="009412d5"/>
    </style:style>
    <style:style style:name="T108" style:family="text">
      <style:text-properties fo:font-style="italic" fo:font-weight="bold" style:font-style-asian="italic" style:font-weight-asian="bold" style:font-style-complex="italic" style:font-weight-complex="bold"/>
    </style:style>
    <style:style style:name="T109" style:family="text">
      <style:text-properties officeooo:rsid="015f4384"/>
    </style:style>
    <style:style style:name="T110" style:family="text">
      <style:text-properties officeooo:rsid="010dbcea"/>
    </style:style>
    <style:style style:name="T111" style:family="text">
      <style:text-properties officeooo:rsid="00951324"/>
    </style:style>
    <style:style style:name="T112" style:family="text">
      <style:text-properties officeooo:rsid="012b02c0"/>
    </style:style>
    <style:style style:name="T113" style:family="text">
      <style:text-properties officeooo:rsid="010f4fcb"/>
    </style:style>
    <style:style style:name="T114" style:family="text">
      <style:text-properties fo:font-weight="bold" officeooo:rsid="010f4fcb" style:font-weight-asian="bold" style:font-weight-complex="bold"/>
    </style:style>
    <style:style style:name="T115" style:family="text">
      <style:text-properties officeooo:rsid="00cdca58"/>
    </style:style>
    <style:style style:name="T116" style:family="text">
      <style:text-properties officeooo:rsid="0116c2d0"/>
    </style:style>
    <style:style style:name="T117" style:family="text">
      <style:text-properties fo:font-weight="bold" officeooo:rsid="00951324" style:font-weight-asian="bold" style:font-weight-complex="bold"/>
    </style:style>
    <style:style style:name="T118" style:family="text">
      <style:text-properties officeooo:rsid="00b6caf5"/>
    </style:style>
    <style:style style:name="T119" style:family="text">
      <style:text-properties officeooo:rsid="0096609f"/>
    </style:style>
    <style:style style:name="T120" style:family="text">
      <style:text-properties officeooo:rsid="0119d4de"/>
    </style:style>
    <style:style style:name="T121" style:family="text">
      <style:text-properties officeooo:rsid="01188743"/>
    </style:style>
    <style:style style:name="T122" style:family="text">
      <style:text-properties officeooo:rsid="011b8d7d"/>
    </style:style>
    <style:style style:name="T123" style:family="text">
      <style:text-properties officeooo:rsid="0097bf1b"/>
    </style:style>
    <style:style style:name="T124" style:family="text">
      <style:text-properties style:text-position="super 58%" officeooo:rsid="0098e2a4"/>
    </style:style>
    <style:style style:name="T125" style:family="text">
      <style:text-properties officeooo:rsid="0098e2a4"/>
    </style:style>
    <style:style style:name="T126" style:family="text">
      <style:text-properties officeooo:rsid="012c9903"/>
    </style:style>
    <style:style style:name="T127" style:family="text">
      <style:text-properties officeooo:rsid="012d138b"/>
    </style:style>
    <style:style style:name="T128" style:family="text">
      <style:text-properties officeooo:rsid="00b88efe"/>
    </style:style>
    <style:style style:name="T129" style:family="text">
      <style:text-properties officeooo:rsid="011ebd5b"/>
    </style:style>
    <style:style style:name="T130" style:family="text">
      <style:text-properties fo:font-style="italic" officeooo:rsid="00b88efe" style:font-style-asian="italic" style:font-style-complex="italic"/>
    </style:style>
    <style:style style:name="T131" style:family="text">
      <style:text-properties officeooo:rsid="00c01fc5"/>
    </style:style>
    <style:style style:name="T132" style:family="text">
      <style:text-properties officeooo:rsid="011bcf34"/>
    </style:style>
    <style:style style:name="T133" style:family="text">
      <style:text-properties fo:font-weight="bold" officeooo:rsid="00c01fc5" style:font-weight-asian="bold" style:font-weight-complex="bold"/>
    </style:style>
    <style:style style:name="T134" style:family="text">
      <style:text-properties officeooo:rsid="01531f46"/>
    </style:style>
    <style:style style:name="T135" style:family="text">
      <style:text-properties fo:font-weight="bold" officeooo:rsid="011d7ab1" style:font-weight-asian="bold" style:font-weight-complex="bold"/>
    </style:style>
    <style:style style:name="T136" style:family="text">
      <style:text-properties fo:font-weight="bold" officeooo:rsid="01218fe2" style:font-weight-asian="bold" style:font-weight-complex="bold"/>
    </style:style>
    <style:style style:name="T137" style:family="text">
      <style:text-properties officeooo:rsid="00c03393"/>
    </style:style>
    <style:style style:name="T138" style:family="text">
      <style:text-properties officeooo:rsid="00c30445"/>
    </style:style>
    <style:style style:name="T139" style:family="text">
      <style:text-properties officeooo:rsid="00cf0935"/>
    </style:style>
    <style:style style:name="T140" style:family="text">
      <style:text-properties officeooo:rsid="01252b15"/>
    </style:style>
    <style:style style:name="T141" style:family="text">
      <style:text-properties officeooo:rsid="01261463"/>
    </style:style>
    <style:style style:name="T142" style:family="text">
      <style:text-properties officeooo:rsid="00ca964e"/>
    </style:style>
    <style:style style:name="T143" style:family="text">
      <style:text-properties fo:font-weight="bold" officeooo:rsid="00ca964e" style:font-weight-asian="bold" style:font-weight-complex="bold"/>
    </style:style>
    <style:style style:name="T144" style:family="text">
      <style:text-properties fo:font-weight="normal" officeooo:rsid="00c01fc5" style:font-weight-asian="normal" style:font-weight-complex="normal"/>
    </style:style>
    <style:style style:name="T145" style:family="text">
      <style:text-properties fo:font-weight="normal" officeooo:rsid="01261463" style:font-weight-asian="normal" style:font-weight-complex="normal"/>
    </style:style>
    <style:style style:name="T146" style:family="text">
      <style:text-properties fo:font-weight="normal" officeooo:rsid="0127915d" style:font-weight-asian="normal" style:font-weight-complex="normal"/>
    </style:style>
    <style:style style:name="T147" style:family="text">
      <style:text-properties fo:font-weight="normal" officeooo:rsid="012ee68e" style:font-weight-asian="normal" style:font-weight-complex="normal"/>
    </style:style>
    <style:style style:name="T148" style:family="text">
      <style:text-properties fo:font-weight="bold" officeooo:rsid="012ee68e" style:font-weight-asian="bold" style:font-weight-complex="bold"/>
    </style:style>
    <style:style style:name="T149" style:family="text">
      <style:text-properties officeooo:rsid="00d3bff8"/>
    </style:style>
    <style:style style:name="T150" style:family="text">
      <style:text-properties fo:font-weight="bold" officeooo:rsid="00d3bff8" style:font-weight-asian="bold" style:font-weight-complex="bold"/>
    </style:style>
    <style:style style:name="T151" style:family="text">
      <style:text-properties fo:font-weight="bold" officeooo:rsid="01586628" style:font-weight-asian="bold" style:font-weight-complex="bold"/>
    </style:style>
    <style:style style:name="T152" style:family="text">
      <style:text-properties officeooo:rsid="00cc2cac"/>
    </style:style>
    <style:style style:name="T153" style:family="text">
      <style:text-properties officeooo:rsid="00d5759f"/>
    </style:style>
    <style:style style:name="T154" style:family="text">
      <style:text-properties officeooo:rsid="00c43948"/>
    </style:style>
    <style:style style:name="T155" style:family="text">
      <style:text-properties officeooo:rsid="00c4d76f"/>
    </style:style>
    <style:style style:name="T156" style:family="text">
      <style:text-properties fo:font-weight="normal" officeooo:rsid="00c4d76f" style:font-weight-asian="normal" style:font-weight-complex="normal"/>
    </style:style>
    <style:style style:name="T157" style:family="text">
      <style:text-properties style:text-underline-style="solid" style:text-underline-width="auto" style:text-underline-color="font-color" fo:font-weight="bold" style:font-weight-asian="bold" style:font-weight-complex="bold"/>
    </style:style>
    <style:style style:name="T158" style:family="text">
      <style:text-properties officeooo:rsid="00e45cb4"/>
    </style:style>
    <style:style style:name="T159" style:family="text">
      <style:text-properties officeooo:rsid="00eba4a8"/>
    </style:style>
    <style:style style:name="T160" style:family="text">
      <style:text-properties officeooo:rsid="00eac7d7"/>
    </style:style>
    <style:style style:name="T161" style:family="text">
      <style:text-properties officeooo:rsid="01349130"/>
    </style:style>
    <style:style style:name="T162" style:family="text">
      <style:text-properties fo:font-weight="bold" officeooo:rsid="01349130" style:font-weight-asian="bold" style:font-weight-complex="bold"/>
    </style:style>
    <style:style style:name="T163" style:family="text">
      <style:text-properties officeooo:rsid="01655463"/>
    </style:style>
    <style:style style:name="T164" style:family="text">
      <style:text-properties officeooo:rsid="00ee610b"/>
    </style:style>
    <style:style style:name="T165" style:family="text">
      <style:text-properties officeooo:rsid="00eea1c8"/>
    </style:style>
    <style:style style:name="T166" style:family="text">
      <style:text-properties officeooo:rsid="00f0a169"/>
    </style:style>
    <style:style style:name="T167" style:family="text">
      <style:text-properties officeooo:rsid="00e5709c"/>
    </style:style>
    <style:style style:name="T168" style:family="text">
      <style:text-properties officeooo:rsid="00e2ada7"/>
    </style:style>
    <style:style style:name="T169" style:family="text">
      <style:text-properties fo:font-weight="bold" officeooo:rsid="013861d6" style:font-weight-asian="bold" style:font-weight-complex="bold"/>
    </style:style>
    <style:style style:name="T170" style:family="text">
      <style:text-properties officeooo:rsid="013861d6"/>
    </style:style>
    <style:style style:name="T171" style:family="text">
      <style:text-properties style:text-underline-style="solid" style:text-underline-width="auto" style:text-underline-color="font-color"/>
    </style:style>
    <style:style style:name="T172" style:family="text">
      <style:text-properties officeooo:rsid="015db5f5"/>
    </style:style>
    <style:style style:name="T173" style:family="text">
      <style:text-properties fo:font-weight="bold" officeooo:rsid="015ff8af" style:font-weight-asian="bold" style:font-weight-complex="bold"/>
    </style:style>
    <style:style style:name="T174" style:family="text">
      <style:text-properties officeooo:rsid="015ff8af"/>
    </style:style>
    <style:style style:name="T175" style:family="text">
      <style:text-properties fo:font-weight="bold" officeooo:rsid="01612fcc" style:font-weight-asian="bold" style:font-weight-complex="bold"/>
    </style:style>
    <style:style style:name="T176" style:family="text">
      <style:text-properties officeooo:rsid="01612fcc"/>
    </style:style>
    <style:style style:name="T177" style:family="text">
      <style:text-properties fo:font-weight="bold" officeooo:rsid="01412ce1" style:font-weight-asian="bold" style:font-weight-complex="bold"/>
    </style:style>
    <style:style style:name="T178" style:family="text">
      <style:text-properties fo:font-weight="normal" officeooo:rsid="01412ce1" style:font-weight-asian="normal" style:font-weight-complex="normal"/>
    </style:style>
    <style:style style:name="T179" style:family="text">
      <style:text-properties fo:font-style="italic" style:font-style-asian="italic" style:font-style-complex="italic"/>
    </style:style>
    <style:style style:name="T180" style:family="text">
      <style:text-properties fo:font-style="italic" officeooo:rsid="00f7996d" style:font-style-asian="italic" style:font-style-complex="italic"/>
    </style:style>
    <style:style style:name="T181" style:family="text">
      <style:text-properties officeooo:rsid="0163a1f3"/>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istori</text:span><text:span text:style-name="T2">cal Context</text:span></text:p>
      <text:p text:style-name="Standard"/>
      <text:p text:style-name="Standard"/>
      <text:p text:style-name="P2"><draw:frame draw:style-name="fr1" draw:name="Frame1" text:anchor-type="as-char" svg:width="4.3043in" draw:z-index="0"><draw:text-box fo:min-height="4.3043in"><text:p text:style-name="P3"><draw:frame draw:style-name="fr2" draw:name="Image1" text:anchor-type="paragraph" svg:width="4.3043in" style:rel-width="100%" svg:height="4.3043in" style:rel-height="scale" draw:z-index="1"><draw:image xlink:href="Pictures/1000000100000320000003206E6F2DB5.png" xlink:type="simple" xlink:show="embed" xlink:actuate="onLoad" draw:mime-type="image/png"/></draw:frame>Latin: Nehemiah restores the walls of Jerusalem</text:p></draw:text-box></draw:frame></text:p>
      <text:p text:style-name="Standard"/>
      <text:p text:style-name="Standard"/>
      <text:p text:style-name="P4"><text:span text:style-name="T3">T</text:span><text:span text:style-name="T4">he 70 year Babylonian captivity </text:span><text:span text:style-name="T5">of the children of Israel </text:span><text:span text:style-name="T6">has</text:span><text:span text:style-name="T4"> ended and it was time to return </text:span><text:span text:style-name="T5">and</text:span><text:span text:style-name="T4"> rebuild.</text:span></text:p>
      <text:p text:style-name="P5"/>
      <text:p text:style-name="P4">T<text:span text:style-name="T4">he first of the three waves of people migrating back to Jerusalem &amp; Judah occurred under the reign of Cyrus </text:span><text:span text:style-name="T7">king of Persia</text:span><text:span text:style-name="T4"> (</text:span><text:span text:style-name="T8">Ezra 1:1-4</text:span><text:span text:style-name="T4">) and it was the largest of the three being comprised of 49,719 people (</text:span><text:span text:style-name="T8">Ezra 2:64,65</text:span>; <text:span text:style-name="T9">congregation 42,360, servants 7,337, singers 200</text:span><text:span text:style-name="T4">). Historically this occurred around 536BC. </text:span><text:span text:style-name="T10">Their mission was to rebuild the temple of God in Jerusalem (</text:span><text:span text:style-name="T11">Ezra 1:2</text:span><text:span text:style-name="T10">). </text:span><text:span text:style-name="T12">They were led by Zerubbabel (the governor) and Jeshua (the high priest).</text:span></text:p>
      <text:p text:style-name="P5"/>
      <text:p text:style-name="P6">I<text:span text:style-name="T13">n</text:span><text:span text:style-name="T7"> the 7</text:span><text:span text:style-name="T14">th</text:span><text:span text:style-name="T7"> year of the reign of Artaxerxes king of Persia, historically about 78 years later, Ezra the priest</text:span><text:span text:style-name="T15"> </text:span><text:span text:style-name="T7">and scribe is sent to Jerusalem </text:span><text:span text:style-name="T16">to </text:span><text:span text:style-name="T17">both perform and </text:span><text:span text:style-name="T16">teach the LORD’s statutes and judgments in Israel </text:span><text:span text:style-name="T18">(</text:span><text:span text:style-name="T19">Ezra 7:1-11</text:span><text:span text:style-name="T18">). </text:span><text:span text:style-name="T20">Any other person, priest, or Levite who was willing was also commanded by king Artaxerxes to go with Ezra (</text:span><text:span text:style-name="T21">Ezra 7:13</text:span><text:span text:style-name="T20">) </text:span><text:span text:style-name="T22">and everything they required to perform their duties was provided. </text:span><text:span text:style-name="T23">1,426 males went with Ezra (</text:span><text:span text:style-name="T24">Ezra 8:1-13</text:span><text:span text:style-name="T23">). </text:span><text:span text:style-name="T25">Ezra found the people, </text:span><text:span text:style-name="T26">the priests, and the Levites</text:span><text:span text:style-name="T25"> at Jerusalem compromised </text:span><text:span text:style-name="T27">by sin</text:span><text:span text:style-name="T25"> and led a massive reformation (</text:span><text:span text:style-name="T28">Ezra 9-10</text:span><text:span text:style-name="T25">).</text:span></text:p>
      <text:p text:style-name="P7"/>
      <text:p text:style-name="P8">1<text:span text:style-name="T29">3 years later (</text:span><text:span text:style-name="T30">Neh</text:span><text:span text:style-name="T31">emiah</text:span><text:span text:style-name="T30"> 2:1</text:span><text:span text:style-name="T29">) Nehemiah, the cupbearer to Artaxerxes </text:span><text:span text:style-name="T32">king of Persia</text:span><text:span text:style-name="T29">, </text:span><text:span text:style-name="T33">is sent to lead the rebuilding of the walls and gates of Jerusalem and</text:span><text:span text:style-name="T29"> become</text:span><text:span text:style-name="T33">s</text:span><text:span text:style-name="T29"> </text:span><text:span text:style-name="T32">the </text:span><text:span text:style-name="T29">Tirshatha </text:span><text:span text:style-name="T34">(</text:span><text:span text:style-name="T29">governor</text:span><text:span text:style-name="T34">) </text:span><text:span text:style-name="T32">of Judah (</text:span><text:span text:style-name="T30">Neh</text:span><text:span text:style-name="T31">emiah</text:span><text:span text:style-name="T35"> 5:14</text:span><text:span text:style-name="T32">). </text:span><text:span text:style-name="T36">Historically this happened around 445-</text:span><text:span text:style-name="T37">444</text:span><text:span text:style-name="T36">BC.</text:span><text:span text:style-name="T32"> </text:span><text:span text:style-name="T38">The wall is finished on the 25</text:span><text:span text:style-name="T39">th</text:span><text:span text:style-name="T38"> day of the 6</text:span><text:span text:style-name="T39">th</text:span><text:span text:style-name="T38"> month </text:span><text:span text:style-name="T40">(</text:span><text:span text:style-name="T30">Neh</text:span><text:span text:style-name="T31">emiah</text:span><text:span text:style-name="T41"> 6:15</text:span><text:span text:style-name="T40">). </text:span><text:span text:style-name="T9">God gives Nehemiah the task of reckoning everyone by their genealogy. </text:span><text:span text:style-name="T42">T</text:span><text:span text:style-name="T9">he total number of people comes to 49,942 (congregation </text:span><text:span text:style-name="T43">42,360, servants 7,337, singers 245</text:span><text:span text:style-name="T9">). </text:span><text:span text:style-name="T44">Those of the priests that could not prove their genealogy were excluded from priestly duties until it could be proven that it was lawful for them to do so. Eliashib the son of Joiakim </text:span><text:span text:style-name="T45">was high priest at this time.</text:span></text:p>
      <text:p text:style-name="Standard"/>
      <text:p text:style-name="P9"><text:soft-page-break/><text:span text:style-name="T46">U</text:span><text:span text:style-name="T47">pon the 1</text:span><text:span text:style-name="T48">st</text:span><text:span text:style-name="T47"> day of the subsequent month, </text:span><text:span text:style-name="T49">that is</text:span><text:span text:style-name="T47"> the 7</text:span><text:span text:style-name="T48">th</text:span><text:span text:style-name="T47"> month, the following happens:</text:span></text:p>
      <text:p text:style-name="P10"/>
      <table:table table:name="Table1" table:style-name="Table1">
        <table:table-column table:style-name="Table1.A"/>
        <table:table-row table:style-name="Table1.1">
          <table:table-cell table:style-name="Table1.A1" office:value-type="string">
            <text:p text:style-name="P11">Nehemiah 8:1-18</text:p>
            <text:p text:style-name="P12"><text:span text:style-name="T50">1</text:span> And all the people gathered themselves together as one man into the street that was before the water gate; and they spake unto Ezra the scribe to bring the book of the law of Moses, which the LORD had commanded to Israel.</text:p>
            <text:p text:style-name="P12"><text:span text:style-name="T50">2</text:span> And Ezra the priest brought the law before the congregation both of men and women, and all that could hear with understanding, upon <text:span text:style-name="T51">the first day of the seventh month</text:span>.</text:p>
            <text:p text:style-name="P12"><text:span text:style-name="T50">3</text:span> And he read therein before the street that was before the water gate from the morning until midday, before the men and the women, and those that could understand; and the ears of all the people were attentive unto the book of the law.</text:p>
            <text:p text:style-name="P12"><text:span text:style-name="T50">4</text:span> And Ezra the scribe stood upon a pulpit of wood, which they had made for the purpose; and beside him stood Mattithiah, and Shema, and Anaiah, and Urijah, and Hilkiah, and Maaseiah, on his right hand; and on his left hand, Pedaiah, and Mishael, and Malchiah, and Hashum, and Hashbadana, Zechariah, and Meshullam.</text:p>
            <text:p text:style-name="P12"><text:span text:style-name="T50">5</text:span> And Ezra opened the book in the sight of all the people; (for he was above all the people;) and when he opened it, all the people stood up:</text:p>
            <text:p text:style-name="P12"><text:span text:style-name="T50">6</text:span> And Ezra blessed the LORD, the great God. And all the people answered, Amen, Amen, with lifting up their hands: and they bowed their heads, and worshipped the LORD with their faces to the ground.</text:p>
            <text:p text:style-name="P12"><text:span text:style-name="T50">7</text:span> Also Jeshua, and Bani, and Sherebiah, Jamin, Akkub, Shabbethai, Hodijah, Maaseiah, Kelita, Azariah, Jozabad, Hanan, Pelaiah, and the Levites, caused the people to understand the law: and the people stood in their place.</text:p>
            <text:p text:style-name="P12"><text:span text:style-name="T50">8</text:span> So they read in the book in the law of God distinctly, and gave the sense, and caused them to understand the reading.</text:p>
            <text:p text:style-name="P12"><text:span text:style-name="T50">9</text:span> And Nehemiah, which is the Tirshatha, and Ezra the priest the scribe, and the Levites that taught the people, said unto all the people, This day is holy unto the LORD your God; mourn not, nor weep. For all the people wept, when they heard the words of the law.</text:p>
            <text:p text:style-name="P12"><text:span text:style-name="T50">10</text:span> Then he said unto them, Go your way, eat the fat, and drink the sweet, and send portions unto them for whom nothing is prepared: for this day is holy unto our Lord: neither be ye sorry; for <text:span text:style-name="T51">the joy of the LORD is your strength</text:span>.</text:p>
            <text:p text:style-name="P12"><text:span text:style-name="T50">11</text:span> So the Levites stilled all the people, saying, Hold your peace, for the day is holy; neither be ye grieved.</text:p>
            <text:p text:style-name="P12"><text:span text:style-name="T50">12</text:span> And all the people went their way to eat, and to drink, and to send portions, and to make great mirth, because they had understood the words that were declared unto them.</text:p>
            <text:p text:style-name="P12"><text:span text:style-name="T50">13</text:span> And on <text:span text:style-name="T51">the second day</text:span> were gathered together the chief of the fathers of all the people, the priests, and the Levites, unto Ezra the scribe, even to understand the words of the law.</text:p>
            <text:p text:style-name="P12"><text:span text:style-name="T50">14</text:span> And they found written in the law which the LORD had commanded by Moses, that the children of Israel <text:span text:style-name="T51">should dwell in booths in the feast of the seventh month</text:span>:</text:p>
            <text:p text:style-name="P12"><text:span text:style-name="T50">15</text:span> And that they should publish and proclaim in all their cities, and in Jerusalem, saying, Go forth unto the mount, and fetch olive branches, and pine branches, and myrtle branches, and palm branches, and branches of thick trees, to make booths, as it is written.</text:p>
            <text:p text:style-name="P12"><text:span text:style-name="T50">16</text:span> So the people went forth, and brought them, and made themselves booths, every one upon the roof of his house, and in their courts, and in the courts of the house of God, and in the street of the water gate, and in the street of the gate of Ephraim.</text:p>
            <text:p text:style-name="P12"><text:span text:style-name="T50">17</text:span> And all the congregation of them that were come again out of the captivity made booths, and sat under the booths: for since the days of Jeshua the son of Nun unto that day had not the children of Israel done so. And there was very great gladness.</text:p>
            <text:p text:style-name="P12"><text:span text:style-name="T50">18</text:span> Also day by day, from the first day unto the last day, he read in the book of the law of God. And they kept the feast seven days; and on the eighth day was a solemn assembly, according unto the manner.</text:p>
          </table:table-cell>
        </table:table-row>
      </table:table>
      <text:p text:style-name="P13"/>
      <text:p text:style-name="P14"><text:span text:style-name="T52">N</text:span><text:span text:style-name="T53">otice anything </text:span><text:span text:style-name="T54">unusual</text:span><text:span text:style-name="T53"> </text:span><text:span text:style-name="T55">besides the </text:span><text:span text:style-name="T56">lack of the </text:span><text:span text:style-name="T57">presence of the high priest </text:span><text:span text:style-name="T56">and the </text:span><text:span text:style-name="T55">priests not blowing the trumpets on the first day of the month (</text:span><text:span text:style-name="T58">Numbers 10:1-10</text:span><text:span text:style-name="T55">)</text:span><text:span text:style-name="T53">? </text:span><text:span text:style-name="T59">L</text:span><text:span text:style-name="T53">et’s review the schedule for the feasts of the LORD in the seventh month.</text:span></text:p>
      <text:p text:style-name="P15"><text:soft-page-break/><text:span text:style-name="T60">F</text:span>easts of the seventh month</text:p>
      <text:p text:style-name="P16"><text:span text:style-name="T60">(</text:span><text:span text:style-name="T61">Ethanim / Tishrei)</text:span></text:p>
      <text:p text:style-name="P14"/>
      <text:p text:style-name="P14"/>
      <table:table table:name="Table2" table:style-name="Table2">
        <table:table-column table:style-name="Table2.A"/>
        <table:table-row>
          <table:table-cell table:style-name="Table2.A1" office:value-type="string">
            <text:p text:style-name="P17">Leviticus 23:1-2</text:p>
            <text:p text:style-name="P18"><text:span text:style-name="T50">1</text:span> And the LORD spake unto Moses, saying,</text:p>
            <text:p text:style-name="P18"><text:span text:style-name="T50">2</text:span> Speak unto the children of Israel, and say unto them, Concerning the feasts of the LORD, which ye shall proclaim to be holy convocations, even these are my feasts.</text:p>
            <text:p text:style-name="P18"/>
            <text:p text:style-name="Table_20_Contents"><text:span text:style-name="T51">Leviticus 23:24-25</text:span> (<text:span text:style-name="T62">Numbers 29:1</text:span>)</text:p>
            <text:p text:style-name="Table_20_Contents"><text:span text:style-name="T50">24</text:span> Speak unto the children of Israel, saying, In the <text:span text:style-name="T51">seventh month</text:span>, in the <text:span text:style-name="T51">first day of the month</text:span>, shall ye have a sabbath, a memorial of blowing of trumpets, an holy convocation.</text:p>
            <text:p text:style-name="Table_20_Contents"><text:span text:style-name="T50">25</text:span> Ye shall do no servile work therein: but ye shall offer an offering made by fire unto the LORD.</text:p>
            <text:p text:style-name="Table_20_Contents"/>
            <text:p text:style-name="P17">Leviticus 23:26-32</text:p>
            <text:p text:style-name="Table_20_Contents"><text:span text:style-name="T50">26</text:span> And the LORD spake unto Moses, saying,</text:p>
            <text:p text:style-name="Table_20_Contents"><text:span text:style-name="T50">27</text:span> Also on <text:span text:style-name="T51">the tenth day of this seventh month</text:span> there shall be a day of atonement: it shall be an holy convocation unto you; and ye shall afflict your souls, and offer an offering made by fire unto the LORD.</text:p>
            <text:p text:style-name="Table_20_Contents"><text:span text:style-name="T50">28</text:span> And ye shall do no work in that same day: for it is a day of atonement, to make an atonement for you before the LORD your God.</text:p>
            <text:p text:style-name="Table_20_Contents"><text:span text:style-name="T50">29</text:span> For whatsoever soul it be that shall not be afflicted in that same day, he shall be cut off from among his people.</text:p>
            <text:p text:style-name="Table_20_Contents"><text:span text:style-name="T50">30</text:span> And whatsoever soul it be that doeth any work in that same day, the same soul will I destroy from among his people.</text:p>
            <text:p text:style-name="Table_20_Contents"><text:span text:style-name="T50">31</text:span> Ye shall do no manner of work: it shall be a statute for ever throughout your generations in all your dwellings.</text:p>
            <text:p text:style-name="Table_20_Contents"><text:span text:style-name="T50">32</text:span> It shall be unto you a sabbath of rest, and ye shall afflict your souls: in the ninth day of the month at even, from even unto even, shall ye celebrate your sabbath.</text:p>
            <text:p text:style-name="Table_20_Contents"/>
            <text:p text:style-name="P17">Leviticus 23:33-43</text:p>
            <text:p text:style-name="Table_20_Contents"><text:span text:style-name="T50">33</text:span> And the LORD spake unto Moses, saying,</text:p>
            <text:p text:style-name="Table_20_Contents"><text:span text:style-name="T50">34</text:span> Speak unto the children of Israel, saying, <text:span text:style-name="T51">The fifteenth day of this seventh month</text:span> shall be the feast of tabernacles for seven days unto the LORD.</text:p>
            <text:p text:style-name="Table_20_Contents"><text:span text:style-name="T50">35</text:span> On the first day shall be an holy convocation: ye shall do no servile work therein.</text:p>
            <text:p text:style-name="Table_20_Contents"><text:span text:style-name="T50">36</text:span> Seven days ye shall offer an offering made by fire unto the LORD: on the eighth day shall be an holy convocation unto you; and ye shall offer an offering made by fire unto the LORD: it is a solemn assembly; and ye shall do no servile work therein.</text:p>
            <text:p text:style-name="Table_20_Contents"><text:span text:style-name="T50">37</text:span> These are the feasts of the LORD, which ye shall proclaim to be holy convocations, to offer an offering made by fire unto the LORD, a burnt offering, and a meat offering, a sacrifice, and drink offerings, every thing upon his day:</text:p>
            <text:p text:style-name="Table_20_Contents"><text:span text:style-name="T50">38</text:span> Beside the sabbaths of the LORD, and beside your gifts, and beside all your vows, and beside all your freewill offerings, which ye give unto the LORD.</text:p>
            <text:p text:style-name="Table_20_Contents"><text:span text:style-name="T50">39</text:span> Also in <text:span text:style-name="T51">the fifteenth day of the seventh month</text:span>, when ye have gathered in the fruit of the land, ye shall keep a feast unto the LORD seven days: on the first day shall be a sabbath, and on the eighth day shall be a sabbath.</text:p>
            <text:p text:style-name="Table_20_Contents"><text:span text:style-name="T50">40</text:span> And ye shall take you on <text:span text:style-name="T51">the first day</text:span> the boughs of goodly trees, branches of palm trees, and the boughs of thick trees, and willows of the brook; and ye shall rejoice before the LORD your God seven days.</text:p>
            <text:p text:style-name="Table_20_Contents"><text:span text:style-name="T50">41</text:span> And ye shall keep it a feast unto the LORD seven days in the year. It shall be a statute for ever in your generations: ye shall celebrate it <text:span text:style-name="T51">in the seventh month</text:span>.</text:p>
            <text:p text:style-name="Table_20_Contents"><text:span text:style-name="T50">42</text:span> Ye shall dwell in booths seven days; all that are Israelites born shall dwell in booths:</text:p>
            <text:p text:style-name="Table_20_Contents"><text:span text:style-name="T50">43</text:span> <text:span text:style-name="T51">That your generations may know that I made the children of Israel to dwell in booths, when I brought them out of the land of Egypt</text:span>: I am the LORD your God.</text:p>
          </table:table-cell>
        </table:table-row>
      </table:table>
      <text:p text:style-name="P19"><text:soft-page-break/><text:span text:style-name="T63">Summarized </text:span>schedule <text:span text:style-name="T64">for the 7</text:span><text:span text:style-name="T65">th</text:span><text:span text:style-name="T64"> month</text:span><text:span text:style-name="T61"> </text:span><text:span text:style-name="T64">from </text:span><text:span text:style-name="T66">Leviticus 23</text:span>:</text:p>
      <text:p text:style-name="P19"/>
      <text:list text:style-name="L1">
        <text:list-item>
          <text:p text:style-name="P20">7<text:span text:style-name="T50">th</text:span> month, <text:span text:style-name="T51">1</text:span><text:span text:style-name="T50">st</text:span> day</text:p>
          <text:list>
            <text:list-item>
              <text:p text:style-name="P20">Blowing of trumpets, Sabbath, holy convocation (gathering/<text:span text:style-name="T67">assembly</text:span>).</text:p>
            </text:list-item>
          </text:list>
        </text:list-item>
        <text:list-item>
          <text:p text:style-name="P20">7<text:span text:style-name="T50">th</text:span> month, <text:span text:style-name="T51">9</text:span><text:span text:style-name="T50">th</text:span> day at even → <text:span text:style-name="T51">10</text:span><text:span text:style-name="T50">th</text:span> day at even</text:p>
          <text:list>
            <text:list-item>
              <text:p text:style-name="P20">Sabbath of rest, afflict your souls.</text:p>
            </text:list-item>
          </text:list>
        </text:list-item>
        <text:list-item>
          <text:p text:style-name="P20">7<text:span text:style-name="T50">th</text:span> month, <text:span text:style-name="T51">10</text:span><text:span text:style-name="T68">th</text:span> day</text:p>
          <text:list>
            <text:list-item>
              <text:p text:style-name="P20">Day of atonement. The once-per-year time that the high priest entered the most holy place.</text:p>
            </text:list-item>
          </text:list>
        </text:list-item>
        <text:list-item>
          <text:p text:style-name="P21">7<text:span text:style-name="T50">th</text:span> month, <text:span text:style-name="T51">15</text:span><text:span text:style-name="T68">th</text:span> day</text:p>
          <text:list>
            <text:list-item>
              <text:p text:style-name="P22"><text:span text:style-name="T69">Feast of tabernacles / feast of booths / </text:span><text:span text:style-name="T70">Sukkot </text:span><text:span text:style-name="T71">(plural for </text:span><text:span text:style-name="T72">Sukkah</text:span> meaning booth or tabernacle).</text:p>
            </text:list-item>
          </text:list>
        </text:list-item>
      </text:list>
      <text:p text:style-name="P23"/>
      <text:p text:style-name="P23"><text:span text:style-name="T73">S</text:span>ummary of <text:span text:style-name="T74">events in the 7</text:span><text:span text:style-name="T75">th</text:span><text:span text:style-name="T74"> month in</text:span> <text:span text:style-name="T51">Nehemiah</text:span>:</text:p>
      <text:p text:style-name="P23"/>
      <text:list text:style-name="L2">
        <text:list-item>
          <text:p text:style-name="P24">7<text:span text:style-name="T50">th</text:span> month, <text:span text:style-name="T51">1</text:span><text:span text:style-name="T50">st</text:span> day</text:p>
          <text:list>
            <text:list-item>
              <text:p text:style-name="P24">Ezra <text:span text:style-name="T76">the </text:span>priest reads the book of law of the LORD from morning until midday.</text:p>
            </text:list-item>
            <text:list-item>
              <text:p text:style-name="P25">The priests and Levites help the people understand the law.</text:p>
            </text:list-item>
          </text:list>
        </text:list-item>
        <text:list-item>
          <text:p text:style-name="P26">7<text:span text:style-name="T50">th</text:span> month, <text:span text:style-name="T51">2</text:span><text:span text:style-name="T50">nd</text:span> day</text:p>
          <text:list>
            <text:list-item>
              <text:p text:style-name="P26">The chief of the fathers of all the people, the priests, and the Levites come to Ezra to understand the law.</text:p>
            </text:list-item>
            <text:list-item>
              <text:p text:style-name="P27"><text:span text:style-name="T77">The commandment to keep the feast of booths (</text:span><text:span text:style-name="T78">Leviticus 23:33-43</text:span>) <text:span text:style-name="T77">is found.</text:span></text:p>
            </text:list-item>
          </text:list>
        </text:list-item>
        <text:list-item>
          <text:p text:style-name="P28">7<text:span text:style-name="T50">th</text:span> month, <text:span text:style-name="T51">15</text:span><text:span text:style-name="T68">th</text:span> day → <text:span text:style-name="T79">23</text:span><text:span text:style-name="T80">rd</text:span><text:span text:style-name="T81"> day</text:span></text:p>
          <text:list>
            <text:list-item>
              <text:p text:style-name="P29">The first day the materials for the booths are gathered, they dwell in booths for 7 days, and the eighth day is a sabbath.</text:p>
            </text:list-item>
          </text:list>
        </text:list-item>
      </text:list>
      <text:p text:style-name="P30"/>
      <text:p text:style-name="P31">What happened to the day of atonement that was supposed to happen on the 10<text:span text:style-name="T50">th</text:span> day? <text:span text:style-name="T51">Nehemiah 8</text:span> skips right over it! <text:span text:style-name="T82">Well, for a </text:span><text:span text:style-name="T83">proper </text:span><text:span text:style-name="T82">day of atonement you </text:span><text:span text:style-name="T83">absolutely </text:span><text:span text:style-name="T82">must have a </text:span><text:span text:style-name="T84">sanctified </text:span><text:span text:style-name="T82">high priest. </text:span><text:span text:style-name="T85">And according to both </text:span><text:span text:style-name="T86">Ezra</text:span><text:span text:style-name="T85"> and </text:span><text:span text:style-name="T86">Nehemiah</text:span><text:span text:style-name="T85"> there was only one high priest at the time of </text:span><text:span text:style-name="T86">Nehemiah 8</text:span><text:span text:style-name="T85">.</text:span><text:span text:style-name="T82"> Why </text:span><text:span text:style-name="T87">is</text:span><text:span text:style-name="T82"> the high priest </text:span><text:span text:style-name="T44">Eliashib the son of Joiakim </text:span><text:span text:style-name="T82">missing from </text:span><text:span text:style-name="T88">Nehemiah 8</text:span><text:span text:style-name="T82"> entirely?</text:span></text:p>
      <text:p text:style-name="P32"/>
      <table:table table:name="Table4" table:style-name="Table4">
        <table:table-column table:style-name="Table4.A"/>
        <table:table-row>
          <table:table-cell table:style-name="Table4.A1" office:value-type="string">
            <text:p text:style-name="P17">Nehemiah 3:1</text:p>
            <text:p text:style-name="Table_20_Contents">Then <text:span text:style-name="T51">Eliashib the high priest</text:span> rose up with his brethren the priests, and they builded the sheep gate; they sanctified it, and set up the doors of it; even unto the tower of Meah they sanctified it, unto the tower of Hananeel.</text:p>
          </table:table-cell>
        </table:table-row>
      </table:table>
      <text:list text:style-name="L3">
        <text:list-item>
          <text:p text:style-name="P33">He was there for the rebuilding of the wall that began on the 3<text:span text:style-name="T50">rd</text:span> day of the 5<text:span text:style-name="T50">th</text:span> month.</text:p>
        </text:list-item>
      </text:list>
      <text:p text:style-name="P34"/>
      <text:p text:style-name="P35"><text:span text:style-name="T89">After that, he isn’t mentioned again until the genealogies in </text:span><text:span text:style-name="T90">Nehemiah 12</text:span><text:span text:style-name="T89">. </text:span><text:span text:style-name="T91">The next we read of him </text:span><text:span text:style-name="T92">after that </text:span><text:span text:style-name="T91">is </text:span><text:span text:style-name="T93">Nehemiah 13</text:span> and it is not good <text:span text:style-name="T94">(cf. </text:span><text:span text:style-name="T95">Genesis 13:13</text:span><text:span text:style-name="T96">; </text:span><text:span text:style-name="T97">13 words; </text:span><text:span text:style-name="T98">symbolizes </text:span><text:span text:style-name="T97">rebellion</text:span><text:span text:style-name="T94">)</text:span><text:span text:style-name="T91">:</text:span></text:p>
      <text:p text:style-name="P36"/>
      <table:table table:name="Table5" table:style-name="Table5">
        <table:table-column table:style-name="Table5.A"/>
        <table:table-row>
          <table:table-cell table:style-name="Table5.A1" office:value-type="string">
            <text:p text:style-name="P37"><text:span text:style-name="T30">Nehemiah 13:1-5,</text:span><text:span text:style-name="T99">7</text:span> (<text:span text:style-name="T100">Deuteronomy 23:3-4</text:span>)</text:p>
            <text:p text:style-name="P38"><text:span text:style-name="T50">1</text:span> On that day they read in the book of Moses in the audience of the people; and therein was found written, that the <text:span text:style-name="T51">Ammonite</text:span> and the <text:span text:style-name="T51">Moabite</text:span> should not come into the congregation of God for ever;</text:p>
            <text:p text:style-name="P38"><text:span text:style-name="T50">2</text:span> Because they met not the children of Israel with bread and with water, but hired Balaam against them, that he should curse them: howbeit our God turned the curse into a blessing.</text:p>
            <text:p text:style-name="P38"><text:span text:style-name="T50">3</text:span> Now it came to pass, when they had heard the law, that they separated from Israel all the mixed multitude.</text:p>
            <text:p text:style-name="P38"><text:span text:style-name="T50">4</text:span> And before this, <text:span text:style-name="T51">Eliashib the priest</text:span>, having the oversight of the chamber of the house of our God, <text:span text:style-name="T51">was allied unto Tobiah</text:span>:</text:p>
            <text:p text:style-name="P38"><text:span text:style-name="T50">5</text:span> And he had prepared for him a great chamber, where aforetime they laid the meat offerings, the frankincense, and the vessels, and the tithes of the corn, the new wine, and the oil, which was commanded to be given to the Levites, and the singers, and the porters; and the offerings of the priests.</text:p>
            <text:p text:style-name="P38">...</text:p>
            <text:p text:style-name="P38"><text:span text:style-name="T50">7</text:span> And I came to Jerusalem, and understood of <text:span text:style-name="T51">the evil that Eliashib did</text:span> for Tobiah, in preparing him a chamber in the courts of the house of God.</text:p>
          </table:table-cell>
        </table:table-row>
      </table:table>
      <table:table table:name="Table6" table:style-name="Table6">
        <table:table-column table:style-name="Table6.A"/>
        <text:soft-page-break/>
        <table:table-row>
          <table:table-cell table:style-name="Table6.A1" office:value-type="string">
            <text:p text:style-name="Table_20_Contents"><text:span text:style-name="T51">Nehemiah 2:10</text:span> (<text:span text:style-name="T101">2:19, 4:3</text:span>)</text:p>
            <text:p text:style-name="Table_20_Contents">When Sanballat the Horonite, and Tobiah the servant, the <text:span text:style-name="T51">Ammonite</text:span>, heard of it, it grieved them exceedingly that there was come a man to seek the welfare of the children of Israel.</text:p>
          </table:table-cell>
        </table:table-row>
      </table:table>
      <text:list text:style-name="L4">
        <text:list-item>
          <text:p text:style-name="P39">Tobiah is an Ammonite.</text:p>
          <text:list>
            <text:list-item>
              <text:p text:style-name="P40">Giving him a room in the house of God was direct rebellion against God’s <text:span text:style-name="T102">command</text:span> in <text:span text:style-name="T51">Deuteronomy 23:3-4</text:span>. <text:span text:style-name="T103">Part of the Levite and priestly duties was to study, memorize, </text:span><text:span text:style-name="T104">teach, and </text:span><text:span text:style-name="T103">copy the word of God </text:span><text:span text:style-name="T105">and </text:span><text:span text:style-name="T103">so to make matters worse – he probably knew it was wrong and decided to do </text:span><text:span text:style-name="T106">it anyway</text:span><text:span text:style-name="T103">.</text:span></text:p>
            </text:list-item>
          </text:list>
        </text:list-item>
        <text:list-item>
          <text:p text:style-name="P41">This particular Ammonite (and Sanballet the Horonite) <text:span text:style-name="T107">was</text:span> <text:span text:style-name="T108">grieved that someone was coming to help the children of Israel</text:span>. Sounds like they didn’t like the children of Israel wouldn’t you say?</text:p>
        </text:list-item>
      </text:list>
      <text:p text:style-name="P42"/>
      <table:table table:name="Table7" table:style-name="Table7">
        <table:table-column table:style-name="Table7.A"/>
        <table:table-row>
          <table:table-cell table:style-name="Table7.A1" office:value-type="string">
            <text:p text:style-name="P17">Nehemiah 13:28,<text:span text:style-name="T109">29</text:span></text:p>
            <text:p text:style-name="Table_20_Contents">And one of the sons of Joiada, the son of <text:span text:style-name="T51">Eliashib the high priest</text:span>, was son in law to Sanballat the Horonite: therefore I chased him from me.</text:p>
          </table:table-cell>
        </table:table-row>
      </table:table>
      <text:p text:style-name="P42"/>
      <text:p text:style-name="P43"><text:span text:style-name="T110">Through </text:span><text:span text:style-name="T111">Eliashib’s grandson, </text:span><text:span text:style-name="T110">Sanballat was family </text:span><text:span text:style-name="T112">to Eliashib </text:span><text:span text:style-name="T113">(</text:span><text:span text:style-name="T114">Deu 23:3</text:span>; Horonite is patrial from Horonaim which is Moab<text:span text:style-name="T113">)</text:span><text:span text:style-name="T111">. That’s the very same Sanballet that threate</text:span><text:span text:style-name="T115">ne</text:span><text:span text:style-name="T111">d Nehemiah </text:span><text:span text:style-name="T116">multiple times </text:span><text:span text:style-name="T111">(</text:span><text:span text:style-name="T117">Nehemiah 6:1-9</text:span><text:span text:style-name="T111">), </text:span><text:span text:style-name="T118">was buddy-buddy with Tobiah, and </text:span><text:span text:style-name="T111">mocked the Jews:</text:span></text:p>
      <text:p text:style-name="P36"/>
      <table:table table:name="Table8" table:style-name="Table8">
        <table:table-column table:style-name="Table8.A"/>
        <table:table-row>
          <table:table-cell table:style-name="Table8.A1" office:value-type="string">
            <text:p text:style-name="P17">Nehemiah 4:1-3, <text:span text:style-name="T119">7-8</text:span></text:p>
            <text:p text:style-name="Table_20_Contents"><text:span text:style-name="T50">1</text:span> But it came to pass, that when Sanballat heard that we builded the wall, <text:span text:style-name="T51">he was wroth</text:span>, and took <text:span text:style-name="T51">great indignation</text:span>, and <text:span text:style-name="T51">mocked the Jews</text:span>.</text:p>
            <text:p text:style-name="Table_20_Contents"><text:span text:style-name="T50">2</text:span> And he spake before his brethren and <text:span text:style-name="T51">the army of Samaria</text:span>, and said, What do these feeble Jews? will they fortify themselves? will they sacrifice? will they make an end in a day? will they revive the stones out of the heaps of the rubbish which are burned?</text:p>
            <text:p text:style-name="Table_20_Contents"><text:span text:style-name="T50">3</text:span> Now <text:span text:style-name="T51">Tobiah the Ammonite was by him</text:span>, and he said, Even that which they build, if a fox go up, he shall even break down their stone wall.</text:p>
            <text:p text:style-name="Table_20_Contents">…</text:p>
            <text:p text:style-name="Table_20_Contents"><text:span text:style-name="T50">7</text:span> But it came to pass, that when <text:span text:style-name="T51">Sanballat</text:span>, and <text:span text:style-name="T51">Tobiah</text:span>, and the <text:span text:style-name="T51">Arabians</text:span>, and the <text:span text:style-name="T51">Ammonites</text:span>, and the <text:span text:style-name="T51">Ashdodites</text:span>, heard that the walls of Jerusalem were made up, and that the breaches began to be stopped, then <text:span text:style-name="T51">they were very wroth</text:span>,</text:p>
            <text:p text:style-name="Table_20_Contents"><text:span text:style-name="T50">8</text:span> <text:span text:style-name="T51">And conspired all of them together</text:span> to come and to <text:span text:style-name="T51">fight</text:span> against Jerusalem, and to <text:span text:style-name="T51">hinder</text:span> it.</text:p>
          </table:table-cell>
        </table:table-row>
      </table:table>
      <text:p text:style-name="P36"/>
      <text:p text:style-name="P44"><text:span text:style-name="T120">N</text:span><text:span text:style-name="T121">otice that </text:span>Israel was surrounded <text:span text:style-name="T122">on all sides </text:span>by enemies:</text:p>
      <text:p text:style-name="P44"/>
      <text:list text:style-name="L5">
        <text:list-item>
          <text:p text:style-name="P45"><text:span text:style-name="T51">North</text:span>: Sanballat (Samaria) <text:span text:style-name="T123">(Horonite</text:span><text:span text:style-name="T124">H2772</text:span><text:span text:style-name="T125"> </text:span><text:span text:style-name="T123">is patrial from Horonaim</text:span><text:span text:style-name="T124">H2773</text:span><text:span text:style-name="T123">, which is </text:span><text:span text:style-name="T126">a </text:span><text:span text:style-name="T127">place</text:span><text:span text:style-name="T126"> in Moab</text:span><text:span text:style-name="T123">)</text:span></text:p>
        </text:list-item>
        <text:list-item>
          <text:p text:style-name="P45"><text:span text:style-name="T51">East</text:span>: Tobiah (Ammon)</text:p>
        </text:list-item>
        <text:list-item>
          <text:p text:style-name="P45"><text:span text:style-name="T51">South</text:span>: Geshem (Arabia)</text:p>
        </text:list-item>
        <text:list-item>
          <text:p text:style-name="P45"><text:span text:style-name="T51">West</text:span>: The Ashdodites (Philistia)</text:p>
        </text:list-item>
      </text:list>
      <text:p text:style-name="Standard"/>
      <text:p text:style-name="P46"><text:span text:style-name="T128">Like elsewhere in scripture, I think this is a</text:span><text:span text:style-name="T129">nother</text:span><text:span text:style-name="T128"> great example of how </text:span><text:span text:style-name="T130">what is not said can speak volumes</text:span><text:span text:style-name="T131"> (</text:span><text:span text:style-name="T132">eg. </text:span><text:span text:style-name="T133">Deu 23:3</text:span><text:span text:style-name="T131"> + Boaz marrying Ruth, </text:span><text:span text:style-name="T134">and God blessing that marriage, </text:span><text:span text:style-name="T131">shows God’s favor for mercy; </text:span><text:span text:style-name="T135">Mat</text:span><text:span text:style-name="T136">t</text:span><text:span text:style-name="T135"> 12:3-7</text:span><text:span text:style-name="T131">).</text:span></text:p>
      <text:p text:style-name="P46"/>
      <text:p text:style-name="P46"><text:span text:style-name="T131">So, their high priest is in league with the enemy and they were surrounded by enemies</text:span>.<text:span text:style-name="T128"> </text:span><text:span text:style-name="T137">T</text:span><text:span text:style-name="T131">hey couldn’t keep the law and they knew it. </text:span><text:span text:style-name="T137">They heard the law and knew why their fathers had been </text:span><text:span text:style-name="T138">sentenced</text:span><text:span text:style-name="T137"> to 70 years in captivity and they saw themselves making the same mistake</text:span><text:span text:style-name="T139">s</text:span><text:span text:style-name="T137">. </text:span><text:span text:style-name="T140">Focusing on what they didn’t have caused them to weep and mourn.</text:span><text:span text:style-name="T137"> </text:span><text:span text:style-name="T141">The wise among them </text:span><text:span text:style-name="T131">encouraged them </text:span><text:span text:style-name="T142">to </text:span><text:span text:style-name="T143">not be</text:span><text:span text:style-name="T133"> sorry</text:span><text:span text:style-name="T131"> but instead to </text:span><text:span text:style-name="T133">be merry</text:span><text:span text:style-name="T144"> </text:span><text:span text:style-name="T145">and </text:span><text:span text:style-name="T146">instead stay focused </text:span><text:span text:style-name="T145">on what they did have </text:span><text:span text:style-name="T147">(</text:span><text:span text:style-name="T148">1Thess 5:16</text:span><text:span text:style-name="T147">)</text:span><text:span text:style-name="T145">.</text:span><text:span text:style-name="T131"> </text:span><text:span text:style-name="T149">And why did they say to do that? Because </text:span><text:span text:style-name="T150">the joy of the LORD is </text:span><text:span text:style-name="T151">our</text:span><text:span text:style-name="T150"> strength</text:span><text:span text:style-name="T149">. </text:span><text:span text:style-name="T152">They didn’t </text:span><text:span text:style-name="T153">need to be merry just because it was a feast day</text:span><text:span text:style-name="T152">. </text:span><text:span text:style-name="T153">They needed to be merry because unlike their fathers</text:span><text:span text:style-name="T154">, their hearts were set on God. </text:span><text:span text:style-name="T155">And that </text:span><text:span text:style-name="T153">my friends, </text:span><text:span text:style-name="T155">is the</text:span><text:span text:style-name="T156"> first and great </text:span><text:span text:style-name="T155">commandment.</text:span></text:p>
      <table:table table:name="Table10" table:style-name="Table10">
        <table:table-column table:style-name="Table10.A"/>
        <text:soft-page-break/>
        <table:table-row>
          <table:table-cell table:style-name="Table10.A1" office:value-type="string">
            <text:p text:style-name="P17">Matthew 22:34-40</text:p>
            <text:p text:style-name="Table_20_Contents"><text:span text:style-name="T50">34</text:span> But when the Pharisees had heard that he had put the Sadducees to silence, they were gathered together.</text:p>
            <text:p text:style-name="Table_20_Contents"><text:span text:style-name="T50">35</text:span> Then one of them, which was a lawyer, asked him a question, tempting him, and saying,</text:p>
            <text:p text:style-name="Table_20_Contents"><text:span text:style-name="T50">36</text:span> Master, which is the great commandment in the law?</text:p>
            <text:p text:style-name="Table_20_Contents"><text:span text:style-name="T50">37</text:span> Jesus said unto him, <text:span text:style-name="T51">Thou shalt love the Lord thy God with all thy heart, and with all thy soul, and with all thy mind.</text:span></text:p>
            <text:p text:style-name="Table_20_Contents"><text:span text:style-name="T50">38</text:span> <text:span text:style-name="T51">This is the first and great commandment.</text:span></text:p>
            <text:p text:style-name="Table_20_Contents"><text:span text:style-name="T50">39</text:span> <text:span text:style-name="T51">And the second is like unto it, Thou shalt love thy neighbour as thyself.</text:span></text:p>
            <text:p text:style-name="Table_20_Contents"><text:span text:style-name="T50">40</text:span> <text:span text:style-name="T157">On these two commandments hang all the law and the prophets</text:span><text:span text:style-name="T51">.</text:span></text:p>
          </table:table-cell>
        </table:table-row>
      </table:table>
      <text:p text:style-name="P47"/>
      <text:p text:style-name="P48"><text:span text:style-name="T158">So, how do we bring this forward to the new covenant and apply it to our lives? </text:span><text:span text:style-name="T159">E</text:span><text:span text:style-name="T160">xactly the same way </text:span><text:span text:style-name="T161">the people in </text:span><text:span text:style-name="T162">Nehemiah</text:span><text:span text:style-name="T161"> did</text:span><text:span text:style-name="T160">. </text:span>God <text:span text:style-name="T158">hasn’t</text:span> finished <text:span text:style-name="T163">building</text:span> His temple <text:span text:style-name="T164">and </text:span><text:span text:style-name="T165">it </text:span><text:span text:style-name="T166">requires</text:span><text:span text:style-name="T165"> hard work </text:span><text:span text:style-name="T163">just like the picture that we are given in the physical rebuilding of the temple and its walls:</text:span></text:p>
      <text:p text:style-name="P48"/>
      <table:table table:name="Table3" table:style-name="Table3">
        <table:table-column table:style-name="Table3.A"/>
        <table:table-row>
          <table:table-cell table:style-name="Table3.A1" office:value-type="string">
            <text:p text:style-name="P49">Luke 17:21</text:p>
            <text:p text:style-name="P50">Neither shall they say, Lo here! or, lo there! for, behold, <text:span text:style-name="T51">the kingdom of God is within you</text:span>. </text:p>
            <text:p text:style-name="P49"/>
            <text:p text:style-name="P49">1 Corinthians 6:19</text:p>
            <text:p text:style-name="P51">What? know ye not that <text:span text:style-name="T51">your body is the temple</text:span> of the Holy Ghost which is in you, which ye have of God, and ye are not your own? </text:p>
            <text:p text:style-name="P51"/>
            <text:p text:style-name="P52">Ephesians 2:10</text:p>
            <text:p text:style-name="P53">For <text:span text:style-name="T51">we are his workmanship</text:span>, created in Christ Jesus unto good works, which God hath before ordained that we should walk in them.</text:p>
            <text:p text:style-name="P53"/>
            <text:p text:style-name="P52">Philippians 1:6</text:p>
            <text:p text:style-name="P53">Being confident of this very thing, that he which hath begun a good <text:span text:style-name="T51">work in you</text:span> will perform it until the day of Jesus Christ:</text:p>
          </table:table-cell>
        </table:table-row>
      </table:table>
      <text:p text:style-name="P48"/>
      <text:p text:style-name="P54"><text:span text:style-name="T167">We’re still</text:span><text:span text:style-name="T168"> surrounded by enemies </text:span><text:span text:style-name="T167">and up against overwhelming odds:</text:span></text:p>
      <text:p text:style-name="P55"/>
      <table:table table:name="Table9" table:style-name="Table9">
        <table:table-column table:style-name="Table9.A"/>
        <table:table-row>
          <table:table-cell table:style-name="Table9.A1" office:value-type="string">
            <text:p text:style-name="P17">1 John 2:15-17</text:p>
            <text:p text:style-name="Table_20_Contents"><text:span text:style-name="T50">15</text:span> Love not the world, neither the things that are in the world. If any man love the world, the love of the Father is not in him.</text:p>
            <text:p text:style-name="Table_20_Contents"><text:span text:style-name="T50">16</text:span> For all that is in the world, the lust of the flesh, and the lust of the eyes, and the pride of life, is not of the Father, but is of the world.</text:p>
            <text:p text:style-name="Table_20_Contents"><text:span text:style-name="T50">17</text:span> And the world passeth away, and the lust thereof: but he that doeth the will of God abideth for ever.</text:p>
            <text:p text:style-name="Table_20_Contents"/>
            <text:p text:style-name="P17">1 Peter 5:8-9</text:p>
            <text:p text:style-name="Table_20_Contents"><text:span text:style-name="T50">8</text:span> Be sober, be vigilant; because your adversary the devil, as a roaring lion, walketh about, seeking whom he may devour:</text:p>
            <text:p text:style-name="Table_20_Contents"><text:span text:style-name="T50">9</text:span> Whom resist stedfast in the faith, knowing that the same afflictions are accomplished in your brethren that are in the world.</text:p>
          </table:table-cell>
        </table:table-row>
      </table:table>
      <text:p text:style-name="P55"/>
      <text:p text:style-name="P56">And in this life we will never be without sin:</text:p>
      <text:p text:style-name="P56"/>
      <table:table table:name="Table11" table:style-name="Table11">
        <table:table-column table:style-name="Table11.A"/>
        <table:table-row>
          <table:table-cell table:style-name="Table11.A1" office:value-type="string">
            <text:p text:style-name="P17">1 John 1:8</text:p>
            <text:p text:style-name="Table_20_Contents">If we say that we have no sin, we deceive ourselves, and the truth is not in us.</text:p>
          </table:table-cell>
        </table:table-row>
      </table:table>
      <text:p text:style-name="P56"/>
      <text:p text:style-name="P56"/>
      <text:p text:style-name="P56"/>
      <text:p text:style-name="P57"><text:soft-page-break/>So what should we do? <text:span text:style-name="T169">Nehemiah 4:9</text:span><text:span text:style-name="T170"> sums up the matter:</text:span></text:p>
      <text:p text:style-name="P57"/>
      <table:table table:name="Table12" table:style-name="Table12">
        <table:table-column table:style-name="Table12.A"/>
        <table:table-row>
          <table:table-cell table:style-name="Table12.A1" office:value-type="string">
            <text:p text:style-name="P17">Nehemiah 4:7-9</text:p>
            <text:p text:style-name="Table_20_Contents"><text:span text:style-name="T50">7</text:span> But it came to pass, that when <text:span text:style-name="T171">Sanballat</text:span>, and <text:span text:style-name="T171">Tobiah</text:span>, and the <text:span text:style-name="T171">Arabians</text:span>, and the <text:span text:style-name="T171">Ammonites</text:span>, and the <text:span text:style-name="T171">Ashdodites</text:span>, heard that the walls of Jerusalem were made up, and that the breaches began to be stopped, then they were very wroth,</text:p>
            <text:p text:style-name="Table_20_Contents"><text:span text:style-name="T50">8</text:span> And conspired all of them together to come and to fight against Jerusalem, and to hinder it.</text:p>
            <text:p text:style-name="Table_20_Contents"><text:span text:style-name="T50">9</text:span> Nevertheless we made our <text:span text:style-name="T51">prayer unto our God</text:span>, and <text:span text:style-name="T51">set a watch against </text:span><text:span text:style-name="T157">them</text:span> day and night, because of them.</text:p>
          </table:table-cell>
        </table:table-row>
      </table:table>
      <text:list text:style-name="L6">
        <text:list-item>
          <text:p text:style-name="P58"><text:span text:style-name="T172">Stay focused on </text:span>God</text:p>
          <text:list>
            <text:list-item>
              <text:p text:style-name="P58"><text:span text:style-name="T173">Nehemiah 1:5</text:span><text:span text:style-name="T174">, </text:span><text:span text:style-name="T173">4:4</text:span><text:span text:style-name="T174">, </text:span><text:span text:style-name="T173">6:9</text:span><text:span text:style-name="T174">, </text:span><text:span text:style-name="T173">13:14</text:span><text:span text:style-name="T174">, </text:span><text:span text:style-name="T173">13:22</text:span><text:span text:style-name="T174">, </text:span><text:span text:style-name="T173">13:29</text:span><text:span text:style-name="T174">, </text:span><text:span text:style-name="T173">13:31</text:span></text:p>
            </text:list-item>
          </text:list>
        </text:list-item>
        <text:list-item>
          <text:p text:style-name="P58">Set a watch against our enemies</text:p>
          <text:list>
            <text:list-item>
              <text:p text:style-name="P58"><text:span text:style-name="T175">Nehemiah 4:13-14</text:span><text:span text:style-name="T176">, </text:span><text:span text:style-name="T175">16-18</text:span><text:span text:style-name="T176">, </text:span><text:span text:style-name="T175">20-23</text:span></text:p>
            </text:list-item>
          </text:list>
        </text:list-item>
      </text:list>
      <text:p text:style-name="P57"/>
      <text:p text:style-name="P59">And likewise, what should we not do?</text:p>
      <text:p text:style-name="P57"/>
      <text:p text:style-name="P60"><text:span text:style-name="T51">Nehemiah </text:span><text:span text:style-name="T177">8</text:span><text:span text:style-name="T178">: </text:span>“<text:span text:style-name="T179">mourn not, nor weep...neither be ye sorry...neither be ye grieved...</text:span><text:span text:style-name="T180">for the joy of the LORD is your strength</text:span>”.</text:p>
      <text:p text:style-name="P61"/>
      <text:p text:style-name="P61">Seek therefore the joy of the LORD <text:span text:style-name="T181">with all thy heart, and with all thy soul, and with all thy min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02T09:44:17.299040065</meta:creation-date>
    <dc:title>The joy of the Lord is your strength</dc:title>
    <meta:editing-duration>PT6H55M52S</meta:editing-duration>
    <meta:editing-cycles>311</meta:editing-cycles>
    <meta:generator>LibreOffice/26.2.4.2$Linux_X86_64 LibreOffice_project/64a984c51f4702dbd3710b13428c673a2f1292e7</meta:generator>
    <dc:date>2026-07-11T12:31:11.615815632</dc:date>
    <meta:print-date>2026-06-02T16:38:55.162126676</meta:print-date>
    <meta:printed-by>PDF files</meta:printed-by>
    <meta:document-statistic meta:table-count="12" meta:image-count="1" meta:object-count="0" meta:page-count="7" meta:paragraph-count="149" meta:word-count="3489" meta:character-count="18595" meta:non-whitespace-character-count="15279"/>
    <meta:template xlink:type="simple" xlink:actuate="onRequest" xlink:title="default" xlink:href="../../../../../Templates/default.ott" meta:date="2026-06-02T09:44:15.502286523"/>
  </office:meta>
</office:document-meta>
</file>