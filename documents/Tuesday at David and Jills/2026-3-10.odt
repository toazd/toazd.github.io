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7.9in" table:align="margins"/>
    </style:style>
    <style:style style:name="Table1.A" style:family="table-column">
      <style:table-column-properties style:column-width="7.9in" style:rel-column-width="65535*"/>
    </style:style>
    <style:style style:name="Table1.A1" style:family="table-cell">
      <style:table-cell-properties fo:padding="0.0382in" fo:border="0.5pt solid #000000"/>
    </style:style>
    <style:style style:name="Table1.A2" style:family="table-cell">
      <style:table-cell-properties fo:padding="0.0382in" fo:border-left="0.5pt solid #000000" fo:border-right="0.5pt solid #000000" fo:border-top="none" fo:border-bottom="0.5pt solid #000000"/>
    </style:style>
    <style:style style:name="Table2" style:family="table">
      <style:table-properties style:width="7.9in" table:align="margins"/>
    </style:style>
    <style:style style:name="Table2.A" style:family="table-column">
      <style:table-column-properties style:column-width="3.95in" style:rel-column-width="32767*"/>
    </style:style>
    <style:style style:name="Table2.B" style:family="table-column">
      <style:table-column-properties style:column-width="3.95in" style:rel-column-width="32768*"/>
    </style:style>
    <style:style style:name="Table2.A1" style:family="table-cell">
      <style:table-cell-properties fo:padding="0.0201in" fo:border-left="0.5pt solid #000000" fo:border-right="none" fo:border-top="0.5pt solid #000000" fo:border-bottom="0.5pt solid #000000"/>
    </style:style>
    <style:style style:name="Table2.B1" style:family="table-cell">
      <style:table-cell-properties style:vertical-align="middle" fo:padding="0.0201in" fo:border="0.5pt solid #000000"/>
    </style:style>
    <style:style style:name="Table2.A2" style:family="table-cell">
      <style:table-cell-properties fo:padding="0.0201in" fo:border-left="0.5pt solid #000000" fo:border-right="none" fo:border-top="none" fo:border-bottom="0.5pt solid #000000"/>
    </style:style>
    <style:style style:name="Table2.A3" style:family="table-cell">
      <style:table-cell-properties fo:padding="0.0201in" fo:border-left="0.5pt solid #000000" fo:border-right="none" fo:border-top="none" fo:border-bottom="0.5pt solid #000000"/>
    </style:style>
    <style:style style:name="Table2.A4" style:family="table-cell">
      <style:table-cell-properties fo:padding="0.0201in" fo:border-left="0.5pt solid #000000" fo:border-right="none" fo:border-top="none" fo:border-bottom="0.5pt solid #000000"/>
    </style:style>
    <style:style style:name="Table2.A5" style:family="table-cell">
      <style:table-cell-properties fo:padding="0.0201in" fo:border-left="0.5pt solid #000000" fo:border-right="none" fo:border-top="none" fo:border-bottom="0.5pt solid #000000"/>
    </style:style>
    <style:style style:name="Table2.A6" style:family="table-cell">
      <style:table-cell-properties fo:padding="0.0201in" fo:border-left="0.5pt solid #000000" fo:border-right="none" fo:border-top="none" fo:border-bottom="0.5pt solid #000000"/>
    </style:style>
    <style:style style:name="Table2.A7" style:family="table-cell">
      <style:table-cell-properties fo:padding="0.0201in" fo:border-left="0.5pt solid #000000" fo:border-right="none" fo:border-top="none" fo:border-bottom="0.5pt solid #000000"/>
    </style:style>
    <style:style style:name="Table2.A8" style:family="table-cell">
      <style:table-cell-properties fo:padding="0.0201in" fo:border-left="0.5pt solid #000000" fo:border-right="none" fo:border-top="none" fo:border-bottom="0.5pt solid #000000"/>
    </style:style>
    <style:style style:name="P1" style:family="paragraph" style:parent-style-name="Table_20_Contents">
      <style:text-properties fo:color="#127622" loext:opacity="100%"/>
    </style:style>
    <style:style style:name="P2" style:family="paragraph" style:parent-style-name="Standard">
      <style:text-properties officeooo:rsid="0013f408" officeooo:paragraph-rsid="00175194"/>
    </style:style>
    <style:style style:name="P3" style:family="paragraph" style:parent-style-name="Standard">
      <style:text-properties fo:font-style="italic" officeooo:paragraph-rsid="0024195d" style:font-style-asian="italic" style:font-style-complex="italic"/>
    </style:style>
    <style:style style:name="P4" style:family="paragraph" style:parent-style-name="Standard">
      <style:text-properties officeooo:paragraph-rsid="0026f08f"/>
    </style:style>
    <style:style style:name="P5" style:family="paragraph" style:parent-style-name="Standard">
      <style:text-properties officeooo:rsid="003c3d8d" officeooo:paragraph-rsid="003c3d8d"/>
    </style:style>
    <style:style style:name="P6" style:family="paragraph" style:parent-style-name="Standard">
      <style:text-properties fo:color="#127622" loext:opacity="100%" officeooo:rsid="003c3d8d" officeooo:paragraph-rsid="003c3d8d"/>
    </style:style>
    <style:style style:name="P7" style:family="paragraph" style:parent-style-name="Standard">
      <style:text-properties officeooo:paragraph-rsid="00275774"/>
    </style:style>
    <style:style style:name="P8" style:family="paragraph" style:parent-style-name="Standard" style:list-style-name="L1">
      <style:text-properties fo:font-style="italic" officeooo:rsid="002c94a0" officeooo:paragraph-rsid="0035e810" style:font-style-asian="italic" style:font-style-complex="italic"/>
    </style:style>
    <style:style style:name="P9" style:family="paragraph" style:parent-style-name="Standard">
      <style:text-properties fo:font-style="italic" officeooo:rsid="002c94a0" officeooo:paragraph-rsid="0035e810" style:font-style-asian="italic" style:font-style-complex="italic"/>
    </style:style>
    <style:style style:name="P10" style:family="paragraph" style:parent-style-name="Standard" style:list-style-name="L1">
      <style:text-properties fo:font-style="normal" officeooo:rsid="003866cc" officeooo:paragraph-rsid="003866cc" style:font-style-asian="normal" style:font-style-complex="normal"/>
    </style:style>
    <style:style style:name="P11" style:family="paragraph" style:parent-style-name="Standard" style:list-style-name="L1">
      <style:text-properties fo:font-style="italic" officeooo:rsid="002c94a0" officeooo:paragraph-rsid="002e7637" style:font-style-asian="italic" style:font-style-complex="italic"/>
    </style:style>
    <style:style style:name="P12" style:family="paragraph" style:parent-style-name="Standard" style:list-style-name="L1">
      <style:text-properties fo:font-style="italic" officeooo:rsid="003de173" officeooo:paragraph-rsid="003de173" style:font-style-asian="italic" style:font-style-complex="italic"/>
    </style:style>
    <style:style style:name="P13" style:family="paragraph" style:parent-style-name="Standard" style:list-style-name="L1">
      <style:text-properties fo:font-style="italic" officeooo:rsid="003f2532" officeooo:paragraph-rsid="003f2532" style:font-style-asian="italic" style:font-style-complex="italic"/>
    </style:style>
    <style:style style:name="P14" style:family="paragraph" style:parent-style-name="Standard">
      <style:text-properties officeooo:rsid="002c94a0" officeooo:paragraph-rsid="002c94a0"/>
    </style:style>
    <style:style style:name="P15" style:family="paragraph" style:parent-style-name="Standard">
      <style:text-properties officeooo:rsid="0046111d" officeooo:paragraph-rsid="0053640d"/>
    </style:style>
    <style:style style:name="P16" style:family="paragraph" style:parent-style-name="Table_20_Contents">
      <style:text-properties fo:font-size="10pt" officeooo:rsid="004a0671" officeooo:paragraph-rsid="004a0671" style:font-size-asian="10pt" style:font-size-complex="10pt"/>
    </style:style>
    <style:style style:name="P17" style:family="paragraph" style:parent-style-name="Table_20_Contents">
      <style:text-properties fo:font-size="10pt" officeooo:rsid="004ac4b7" officeooo:paragraph-rsid="004ac4b7" style:font-size-asian="10pt" style:font-size-complex="10pt"/>
    </style:style>
    <style:style style:name="P18" style:family="paragraph" style:parent-style-name="Table_20_Contents">
      <style:text-properties fo:font-size="10pt" officeooo:rsid="004c652f" officeooo:paragraph-rsid="004c652f" style:font-size-asian="10pt" style:font-size-complex="10pt"/>
    </style:style>
    <style:style style:name="P19" style:family="paragraph" style:parent-style-name="Table_20_Contents">
      <style:text-properties fo:font-size="10pt" officeooo:rsid="004c991c" officeooo:paragraph-rsid="004c991c" style:font-size-asian="10pt" style:font-size-complex="10pt"/>
    </style:style>
    <style:style style:name="P20" style:family="paragraph" style:parent-style-name="Table_20_Contents">
      <style:text-properties fo:font-size="10pt" officeooo:rsid="004c9b0d" officeooo:paragraph-rsid="004c9b0d" style:font-size-asian="10pt" style:font-size-complex="10pt"/>
    </style:style>
    <style:style style:name="P21" style:family="paragraph" style:parent-style-name="Table_20_Contents">
      <style:text-properties fo:font-size="10pt" officeooo:rsid="004de076" officeooo:paragraph-rsid="004de076" style:font-size-asian="10pt" style:font-size-complex="10pt"/>
    </style:style>
    <style:style style:name="P22" style:family="paragraph" style:parent-style-name="Standard">
      <style:text-properties officeooo:rsid="00576209" officeooo:paragraph-rsid="00578141"/>
    </style:style>
    <style:style style:name="P23" style:family="paragraph" style:parent-style-name="Standard">
      <style:text-properties officeooo:paragraph-rsid="008d5b4e"/>
    </style:style>
    <style:style style:name="P24" style:family="paragraph" style:parent-style-name="Standard">
      <style:text-properties officeooo:rsid="00588579" officeooo:paragraph-rsid="00588579"/>
    </style:style>
    <style:style style:name="P25" style:family="paragraph" style:parent-style-name="Standard">
      <style:text-properties officeooo:rsid="005d8c32" officeooo:paragraph-rsid="005d8c32"/>
    </style:style>
    <style:style style:name="P26" style:family="paragraph" style:parent-style-name="Standard" style:list-style-name="L2">
      <style:text-properties officeooo:rsid="005f70f1" officeooo:paragraph-rsid="005f70f1"/>
    </style:style>
    <style:style style:name="P27" style:family="paragraph" style:parent-style-name="Standard" style:list-style-name="L3">
      <style:text-properties officeooo:rsid="0060fd2f" officeooo:paragraph-rsid="0060fd2f"/>
    </style:style>
    <style:style style:name="P28" style:family="paragraph" style:parent-style-name="Standard" style:list-style-name="L2">
      <style:text-properties officeooo:rsid="005da2f2" officeooo:paragraph-rsid="005da2f2"/>
    </style:style>
    <style:style style:name="P29" style:family="paragraph" style:parent-style-name="Standard">
      <style:text-properties officeooo:rsid="005da2f2" officeooo:paragraph-rsid="005da2f2"/>
    </style:style>
    <style:style style:name="P30" style:family="paragraph" style:parent-style-name="Standard">
      <style:text-properties officeooo:rsid="006b1cda" officeooo:paragraph-rsid="006b1cda"/>
    </style:style>
    <style:style style:name="P31" style:family="paragraph" style:parent-style-name="Standard" style:list-style-name="L4">
      <style:text-properties officeooo:paragraph-rsid="00ac0f8e"/>
    </style:style>
    <style:style style:name="P32" style:family="paragraph" style:parent-style-name="Standard" style:list-style-name="L4">
      <style:text-properties officeooo:rsid="00730e30" officeooo:paragraph-rsid="00ac0f8e"/>
    </style:style>
    <style:style style:name="P33" style:family="paragraph" style:parent-style-name="Standard">
      <style:text-properties officeooo:rsid="00730e30" officeooo:paragraph-rsid="00730e30"/>
    </style:style>
    <style:style style:name="P34" style:family="paragraph" style:parent-style-name="Standard">
      <style:text-properties officeooo:paragraph-rsid="007668fa"/>
    </style:style>
    <style:style style:name="P35" style:family="paragraph" style:parent-style-name="Standard">
      <style:text-properties officeooo:rsid="007668fa" officeooo:paragraph-rsid="007668fa"/>
    </style:style>
    <style:style style:name="P36" style:family="paragraph" style:parent-style-name="Standard">
      <style:text-properties officeooo:rsid="007c0ec3" officeooo:paragraph-rsid="007c0ec3"/>
    </style:style>
    <style:style style:name="P37" style:family="paragraph" style:parent-style-name="Standard">
      <style:text-properties officeooo:rsid="00ac744c" officeooo:paragraph-rsid="00ae0458"/>
    </style:style>
    <style:style style:name="P38" style:family="paragraph" style:parent-style-name="Standard">
      <style:text-properties officeooo:rsid="00a0c923" officeooo:paragraph-rsid="00a0c923"/>
    </style:style>
    <style:style style:name="T1" style:family="text">
      <style:text-properties fo:background-color="transparent" loext:char-shading-value="0"/>
    </style:style>
    <style:style style:name="T2" style:family="text">
      <style:text-properties fo:background-color="#ffff00" loext:char-shading-value="0"/>
    </style:style>
    <style:style style:name="T3" style:family="text">
      <style:text-properties officeooo:rsid="00175194"/>
    </style:style>
    <style:style style:name="T4" style:family="text">
      <style:text-properties officeooo:rsid="001910ca"/>
    </style:style>
    <style:style style:name="T5" style:family="text">
      <style:text-properties officeooo:rsid="001b1b23"/>
    </style:style>
    <style:style style:name="T6" style:family="text">
      <style:text-properties officeooo:rsid="001e26a0"/>
    </style:style>
    <style:style style:name="T7" style:family="text">
      <style:text-properties officeooo:rsid="001ac760"/>
    </style:style>
    <style:style style:name="T8" style:family="text">
      <style:text-properties fo:font-style="italic" officeooo:rsid="00209b54" style:font-style-asian="italic" style:font-style-complex="italic"/>
    </style:style>
    <style:style style:name="T9" style:family="text">
      <style:text-properties officeooo:rsid="00209b54"/>
    </style:style>
    <style:style style:name="T10" style:family="text">
      <style:text-properties officeooo:rsid="0023c9f5"/>
    </style:style>
    <style:style style:name="T11" style:family="text">
      <style:text-properties officeooo:rsid="00224bfb"/>
    </style:style>
    <style:style style:name="T12" style:family="text">
      <style:text-properties officeooo:rsid="0015f202"/>
    </style:style>
    <style:style style:name="T13" style:family="text">
      <style:text-properties officeooo:rsid="001bdc1e"/>
    </style:style>
    <style:style style:name="T14" style:family="text">
      <style:text-properties officeooo:rsid="0032b42d"/>
    </style:style>
    <style:style style:name="T15" style:family="text">
      <style:text-properties fo:color="#127622" loext:opacity="100%" officeooo:rsid="001bdc1e"/>
    </style:style>
    <style:style style:name="T16" style:family="text">
      <style:text-properties officeooo:rsid="0032d136"/>
    </style:style>
    <style:style style:name="T17" style:family="text">
      <style:text-properties officeooo:rsid="001de7b0"/>
    </style:style>
    <style:style style:name="T18" style:family="text">
      <style:text-properties officeooo:rsid="003a91ea"/>
    </style:style>
    <style:style style:name="T19" style:family="text">
      <style:text-properties fo:color="#127622" loext:opacity="100%" officeooo:rsid="003a91ea"/>
    </style:style>
    <style:style style:name="T20" style:family="text">
      <style:text-properties fo:font-style="italic" officeooo:rsid="0025f676" style:font-style-asian="italic" style:font-style-complex="italic"/>
    </style:style>
    <style:style style:name="T21" style:family="text">
      <style:text-properties officeooo:rsid="002f5c30"/>
    </style:style>
    <style:style style:name="T22" style:family="text">
      <style:text-properties officeooo:rsid="0038e07b"/>
    </style:style>
    <style:style style:name="T23" style:family="text">
      <style:text-properties officeooo:rsid="003936b5"/>
    </style:style>
    <style:style style:name="T24" style:family="text">
      <style:text-properties fo:color="#127622" loext:opacity="100%" officeooo:rsid="003936b5"/>
    </style:style>
    <style:style style:name="T25" style:family="text">
      <style:text-properties officeooo:rsid="00403f71"/>
    </style:style>
    <style:style style:name="T26" style:family="text">
      <style:text-properties fo:color="#127622" loext:opacity="100%" officeooo:rsid="00403f71"/>
    </style:style>
    <style:style style:name="T27" style:family="text">
      <style:text-properties officeooo:rsid="00406012"/>
    </style:style>
    <style:style style:name="T28" style:family="text">
      <style:text-properties officeooo:rsid="0043005f"/>
    </style:style>
    <style:style style:name="T29" style:family="text">
      <style:text-properties fo:color="#127622" loext:opacity="100%" officeooo:rsid="00424430"/>
    </style:style>
    <style:style style:name="T30" style:family="text">
      <style:text-properties officeooo:rsid="00424430"/>
    </style:style>
    <style:style style:name="T31" style:family="text">
      <style:text-properties fo:color="#127622" loext:opacity="100%"/>
    </style:style>
    <style:style style:name="T32" style:family="text">
      <style:text-properties officeooo:rsid="00275774"/>
    </style:style>
    <style:style style:name="T33" style:family="text">
      <style:text-properties fo:color="#127622" loext:opacity="100%" officeooo:rsid="00275774"/>
    </style:style>
    <style:style style:name="T34" style:family="text">
      <style:text-properties style:text-position="super 58%"/>
    </style:style>
    <style:style style:name="T35" style:family="text">
      <style:text-properties officeooo:rsid="001cc81e"/>
    </style:style>
    <style:style style:name="T36" style:family="text">
      <style:text-properties officeooo:rsid="0028d8ea"/>
    </style:style>
    <style:style style:name="T37" style:family="text">
      <style:text-properties fo:color="#127622" loext:opacity="100%" officeooo:rsid="0028d8ea"/>
    </style:style>
    <style:style style:name="T38" style:family="text">
      <style:text-properties fo:color="#127622" loext:opacity="100%" officeooo:rsid="001dfee1"/>
    </style:style>
    <style:style style:name="T39" style:family="text">
      <style:text-properties fo:color="#127622" loext:opacity="100%" officeooo:rsid="00276a7d"/>
    </style:style>
    <style:style style:name="T40" style:family="text">
      <style:text-properties officeooo:rsid="001dfee1"/>
    </style:style>
    <style:style style:name="T41" style:family="text">
      <style:text-properties style:text-position="super 58%" officeooo:rsid="00275774"/>
    </style:style>
    <style:style style:name="T42" style:family="text">
      <style:text-properties fo:font-style="italic" officeooo:rsid="001dfee1" style:font-style-asian="italic" style:font-style-complex="italic"/>
    </style:style>
    <style:style style:name="T43" style:family="text">
      <style:text-properties officeooo:rsid="0036b09c"/>
    </style:style>
    <style:style style:name="T44" style:family="text">
      <style:text-properties officeooo:rsid="002e7637"/>
    </style:style>
    <style:style style:name="T45" style:family="text">
      <style:text-properties officeooo:rsid="0084e5cc"/>
    </style:style>
    <style:style style:name="T46" style:family="text">
      <style:text-properties officeooo:rsid="00490825"/>
    </style:style>
    <style:style style:name="T47" style:family="text">
      <style:text-properties fo:color="#127622" loext:opacity="100%" officeooo:rsid="00470010"/>
    </style:style>
    <style:style style:name="T48" style:family="text">
      <style:text-properties officeooo:rsid="00470010"/>
    </style:style>
    <style:style style:name="T49" style:family="text">
      <style:text-properties fo:color="#127622" loext:opacity="100%" officeooo:rsid="00473250"/>
    </style:style>
    <style:style style:name="T50" style:family="text">
      <style:text-properties officeooo:rsid="00473250"/>
    </style:style>
    <style:style style:name="T51" style:family="text">
      <style:text-properties fo:color="#127622" loext:opacity="100%" officeooo:rsid="00490825"/>
    </style:style>
    <style:style style:name="T52" style:family="text">
      <style:text-properties officeooo:rsid="0053640d"/>
    </style:style>
    <style:style style:name="T53" style:family="text">
      <style:text-properties officeooo:rsid="004a0671"/>
    </style:style>
    <style:style style:name="T54" style:family="text">
      <style:text-properties officeooo:rsid="0088a2e4"/>
    </style:style>
    <style:style style:name="T55" style:family="text">
      <style:text-properties officeooo:rsid="004fc807"/>
    </style:style>
    <style:style style:name="T56" style:family="text">
      <style:text-properties officeooo:rsid="00544504"/>
    </style:style>
    <style:style style:name="T57" style:family="text">
      <style:text-properties fo:color="#127622" loext:opacity="100%" officeooo:rsid="004fc807"/>
    </style:style>
    <style:style style:name="T58" style:family="text">
      <style:text-properties officeooo:rsid="00578141"/>
    </style:style>
    <style:style style:name="T59" style:family="text">
      <style:text-properties officeooo:rsid="00588579"/>
    </style:style>
    <style:style style:name="T60" style:family="text">
      <style:text-properties officeooo:rsid="008bd2d0"/>
    </style:style>
    <style:style style:name="T61" style:family="text">
      <style:text-properties fo:color="#127622" loext:opacity="100%" officeooo:rsid="00588579"/>
    </style:style>
    <style:style style:name="T62" style:family="text">
      <style:text-properties fo:color="#127622" loext:opacity="100%" officeooo:rsid="008bd2d0"/>
    </style:style>
    <style:style style:name="T63" style:family="text">
      <style:text-properties officeooo:rsid="008e367f"/>
    </style:style>
    <style:style style:name="T64" style:family="text">
      <style:text-properties officeooo:rsid="0059e57b"/>
    </style:style>
    <style:style style:name="T65" style:family="text">
      <style:text-properties officeooo:rsid="005cd1b2"/>
    </style:style>
    <style:style style:name="T66" style:family="text">
      <style:text-properties fo:color="#127622" loext:opacity="100%" officeooo:rsid="005cd1b2"/>
    </style:style>
    <style:style style:name="T67" style:family="text">
      <style:text-properties fo:color="#127622" loext:opacity="100%" officeooo:rsid="0059e57b"/>
    </style:style>
    <style:style style:name="T68" style:family="text">
      <style:text-properties officeooo:rsid="005d5511"/>
    </style:style>
    <style:style style:name="T69" style:family="text">
      <style:text-properties officeooo:rsid="005d8c32"/>
    </style:style>
    <style:style style:name="T70" style:family="text">
      <style:text-properties fo:color="#127622" loext:opacity="100%" officeooo:rsid="005d5511"/>
    </style:style>
    <style:style style:name="T71" style:family="text">
      <style:text-properties officeooo:rsid="008f830f"/>
    </style:style>
    <style:style style:name="T72" style:family="text">
      <style:text-properties officeooo:rsid="005f8d47"/>
    </style:style>
    <style:style style:name="T73" style:family="text">
      <style:text-properties officeooo:rsid="005ef5f7"/>
    </style:style>
    <style:style style:name="T74" style:family="text">
      <style:text-properties officeooo:rsid="005ff337"/>
    </style:style>
    <style:style style:name="T75" style:family="text">
      <style:text-properties fo:color="#127622" loext:opacity="100%" officeooo:rsid="005ff337"/>
    </style:style>
    <style:style style:name="T76" style:family="text">
      <style:text-properties officeooo:rsid="00606a45"/>
    </style:style>
    <style:style style:name="T77" style:family="text">
      <style:text-properties officeooo:rsid="00607989"/>
    </style:style>
    <style:style style:name="T78" style:family="text">
      <style:text-properties fo:color="#127622" loext:opacity="100%" officeooo:rsid="00606a45"/>
    </style:style>
    <style:style style:name="T79" style:family="text">
      <style:text-properties fo:font-style="italic" officeooo:rsid="00606a45" style:font-style-asian="italic" style:font-style-complex="italic"/>
    </style:style>
    <style:style style:name="T80" style:family="text">
      <style:text-properties fo:color="#127622" loext:opacity="100%" fo:font-style="italic" officeooo:rsid="00606a45" style:font-style-asian="italic" style:font-style-complex="italic"/>
    </style:style>
    <style:style style:name="T81" style:family="text">
      <style:text-properties officeooo:rsid="0062e27e"/>
    </style:style>
    <style:style style:name="T82" style:family="text">
      <style:text-properties officeooo:rsid="0065f154"/>
    </style:style>
    <style:style style:name="T83" style:family="text">
      <style:text-properties officeooo:rsid="00643b7f"/>
    </style:style>
    <style:style style:name="T84" style:family="text">
      <style:text-properties officeooo:rsid="005e1aa4"/>
    </style:style>
    <style:style style:name="T85" style:family="text">
      <style:text-properties officeooo:rsid="00691304"/>
    </style:style>
    <style:style style:name="T86" style:family="text">
      <style:text-properties officeooo:rsid="0067972b"/>
    </style:style>
    <style:style style:name="T87" style:family="text">
      <style:text-properties officeooo:rsid="00912ee2"/>
    </style:style>
    <style:style style:name="T88" style:family="text">
      <style:text-properties fo:color="#127622" loext:opacity="100%" officeooo:rsid="005e1aa4"/>
    </style:style>
    <style:style style:name="T89" style:family="text">
      <style:text-properties officeooo:rsid="006ead37"/>
    </style:style>
    <style:style style:name="T90" style:family="text">
      <style:text-properties officeooo:rsid="006ff129"/>
    </style:style>
    <style:style style:name="T91" style:family="text">
      <style:text-properties officeooo:rsid="00938f34"/>
    </style:style>
    <style:style style:name="T92" style:family="text">
      <style:text-properties officeooo:rsid="0093a7dd"/>
    </style:style>
    <style:style style:name="T93" style:family="text">
      <style:text-properties officeooo:rsid="009429cc"/>
    </style:style>
    <style:style style:name="T94" style:family="text">
      <style:text-properties officeooo:rsid="0070e507"/>
    </style:style>
    <style:style style:name="T95" style:family="text">
      <style:text-properties officeooo:rsid="00730e30"/>
    </style:style>
    <style:style style:name="T96" style:family="text">
      <style:text-properties fo:color="#127622" loext:opacity="100%" officeooo:rsid="0070e507"/>
    </style:style>
    <style:style style:name="T97" style:family="text">
      <style:text-properties officeooo:rsid="00744d50"/>
    </style:style>
    <style:style style:name="T98" style:family="text">
      <style:text-properties officeooo:rsid="00946e63"/>
    </style:style>
    <style:style style:name="T99" style:family="text">
      <style:text-properties officeooo:rsid="0095ccdc"/>
    </style:style>
    <style:style style:name="T100" style:family="text">
      <style:text-properties officeooo:rsid="0095f40c"/>
    </style:style>
    <style:style style:name="T101" style:family="text">
      <style:text-properties officeooo:rsid="0075d506"/>
    </style:style>
    <style:style style:name="T102" style:family="text">
      <style:text-properties officeooo:rsid="00777696"/>
    </style:style>
    <style:style style:name="T103" style:family="text">
      <style:text-properties officeooo:rsid="007668fa"/>
    </style:style>
    <style:style style:name="T104" style:family="text">
      <style:text-properties fo:color="#127622" loext:opacity="100%" officeooo:rsid="007668fa"/>
    </style:style>
    <style:style style:name="T105" style:family="text">
      <style:text-properties officeooo:rsid="00771744"/>
    </style:style>
    <style:style style:name="T106" style:family="text">
      <style:text-properties officeooo:rsid="009916f0"/>
    </style:style>
    <style:style style:name="T107" style:family="text">
      <style:text-properties officeooo:rsid="0079b93f"/>
    </style:style>
    <style:style style:name="T108" style:family="text">
      <style:text-properties fo:color="#127622" loext:opacity="100%" officeooo:rsid="0079b93f"/>
    </style:style>
    <style:style style:name="T109" style:family="text">
      <style:text-properties officeooo:rsid="007ee62f"/>
    </style:style>
    <style:style style:name="T110" style:family="text">
      <style:text-properties officeooo:rsid="009c8347"/>
    </style:style>
    <style:style style:name="T111" style:family="text">
      <style:text-properties officeooo:rsid="007b8e47"/>
    </style:style>
    <style:style style:name="T112" style:family="text">
      <style:text-properties officeooo:rsid="009d27ce"/>
    </style:style>
    <style:style style:name="T113" style:family="text">
      <style:text-properties officeooo:rsid="007fd88e"/>
    </style:style>
    <style:style style:name="T114" style:family="text">
      <style:text-properties fo:color="#127622" loext:opacity="100%" officeooo:rsid="007b8e47"/>
    </style:style>
    <style:style style:name="T115" style:family="text">
      <style:text-properties officeooo:rsid="007dcac1"/>
    </style:style>
    <style:style style:name="T116" style:family="text">
      <style:text-properties officeooo:rsid="009de51c"/>
    </style:style>
    <style:style style:name="T117" style:family="text">
      <style:text-properties officeooo:rsid="00a807aa"/>
    </style:style>
    <style:style style:name="T118" style:family="text">
      <style:text-properties officeooo:rsid="00a9e4b9"/>
    </style:style>
    <style:style style:name="T119" style:family="text">
      <style:text-properties officeooo:rsid="009f2643"/>
    </style:style>
    <style:style style:name="T120" style:family="text">
      <style:text-properties officeooo:rsid="0081a6cf"/>
    </style:style>
    <style:style style:name="T121" style:family="text">
      <style:text-properties officeooo:rsid="00aa6519"/>
    </style:style>
    <style:style style:name="T122" style:family="text">
      <style:text-properties officeooo:rsid="00aa9c35"/>
    </style:style>
    <style:style style:name="T123" style:family="text">
      <style:text-properties officeooo:rsid="00a213ad"/>
    </style:style>
    <style:style style:name="T124" style:family="text">
      <style:text-properties officeooo:rsid="00a3d774"/>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row>
          <table:table-cell table:style-name="Table1.A1" office:value-type="string">
            <text:p text:style-name="P1">Exodus 38:8</text:p>
            <text:p text:style-name="Table_20_Contents">And he made the laver of brass, and the foot of it of brass, of the lookingglasses of the women <text:span text:style-name="T1">assembling</text:span>, which <text:span text:style-name="T2">assembled at the door of the tabernacle of the congregation</text:span>.</text:p>
          </table:table-cell>
        </table:table-row>
        <table:table-row>
          <table:table-cell table:style-name="Table1.A2" office:value-type="string">
            <text:p text:style-name="P1">1 Samuel 2:22</text:p>
            <text:p text:style-name="Table_20_Contents">Now Eli was very old, and heard all that his sons did unto all Israel; and how they lay with the women that <text:span text:style-name="T2">assembled at the door of the tabernacle of the congregation</text:span>.</text:p>
          </table:table-cell>
        </table:table-row>
      </table:table>
      <text:p text:style-name="Standard"/>
      <text:p text:style-name="P2">These woman are only mentioned two times in the entire Bible. <text:span text:style-name="T3">At first glance it appears that we aren’t given much information about who these woman were or what they did. However, when we carefully consider the details that we are given in light of all of scripture we can learn so much more. </text:span><text:span text:style-name="T4">For example, we are told </text:span><text:span text:style-name="T5">that they assembled </text:span><text:span text:style-name="T4">“at the door of the tabernacle of the congregation”. </text:span><text:span text:style-name="T6">So the question is, w</text:span><text:span text:style-name="T4">here </text:span><text:span text:style-name="T7">exactly is that? </text:span><text:span text:style-name="T8">PAUSE</text:span><text:span text:style-name="T9">.</text:span></text:p>
      <text:p text:style-name="P2"/>
      <text:p text:style-name="P3"><text:span text:style-name="T10">DESCRIBE</text:span><text:span text:style-name="T11"> DIAGRAM</text:span></text:p>
      <text:p text:style-name="P2"/>
      <text:p text:style-name="P4"><text:span text:style-name="T12">The phrase “door of the tabernacle of the congregation” appears 45 times in 45 verses. Let’s have a look at a few of them. </text:span><text:span text:style-name="T13">The firs</text:span><text:span text:style-name="T14">t, second, third, and fourth time that</text:span><text:span text:style-name="T13"> this phrase appears is in </text:span><text:span text:style-name="T15">Exodus 29</text:span> <text:span text:style-name="T16">which describes the process for </text:span><text:span text:style-name="T17">hallowing the priests to minister to God </text:span><text:span text:style-name="T18">(TURN TO </text:span><text:span text:style-name="T19">EXO 29</text:span><text:span text:style-name="T18">)</text:span><text:span text:style-name="T17">. </text:span><text:span text:style-name="T20">BEFORE READING EXPLAIN THE DIFFERENCE BETWEEN A LEVITE AND A PRIEST</text:span><text:span text:style-name="T21">. </text:span><text:span text:style-name="T22">All priests are Levites but not all Levites are priests </text:span><text:span text:style-name="T23">(</text:span><text:span text:style-name="T24">Lev 18</text:span><text:span text:style-name="T23">)</text:span><text:span text:style-name="T22">. </text:span><text:span text:style-name="T25">(</text:span><text:span text:style-name="T26">Ezekiel</text:span><text:span text:style-name="T25">, Millennial kingdom; sons of Zadok </text:span><text:span text:style-name="T27">the son of </text:span><text:span text:style-name="T28">Eleazar the son of </text:span><text:span text:style-name="T27">Aaron the son of Levi; </text:span><text:span text:style-name="T29">1Ch 6:3-8</text:span><text:span text:style-name="T30">, </text:span><text:span text:style-name="T29">Ezra 7:1-5</text:span><text:span text:style-name="T25">).</text:span></text:p>
      <text:p text:style-name="P4"/>
      <text:p text:style-name="P5">READ <text:span text:style-name="T31">EXODUS 29:1,4,11</text:span></text:p>
      <text:p text:style-name="P6"/>
      <text:p text:style-name="P7"><text:span text:style-name="T32">v</text:span><text:span text:style-name="T33">4</text:span> (1<text:span text:style-name="T34">st</text:span>)<text:span text:style-name="T33"> </text:span><text:span text:style-name="T35">the priests were able to wash nearby </text:span><text:span text:style-name="T36">(</text:span><text:span text:style-name="T37">Exo 40:12</text:span><text:span text:style-name="T36">)</text:span></text:p>
      <text:list text:style-name="L1">
        <text:list-item>
          <text:p text:style-name="P8">SHOW ON DIAGRAM WHERE THE LAVER FOR WASHING WAS</text:p>
        </text:list-item>
      </text:list>
      <text:p text:style-name="P9"/>
      <text:p text:style-name="P7"><text:span text:style-name="T32">v</text:span><text:span text:style-name="T38">11</text:span>, <text:span text:style-name="T39">42</text:span><text:span text:style-name="T40"> </text:span><text:span text:style-name="T32">(2</text:span><text:span text:style-name="T41">nd</text:span><text:span text:style-name="T32">) </text:span><text:span text:style-name="T40">Wherever this place is, it is “</text:span><text:span text:style-name="T42">before the LORD</text:span><text:span text:style-name="T40">”. </text:span><text:span text:style-name="T43">So, where is “before the LORD”?</text:span></text:p>
      <text:list text:continue-numbering="true" text:style-name="L1">
        <text:list-item>
          <text:p text:style-name="P10">First, we need to understand that “before the LORD” does not mean “before him in time” but instead it means “in front of the LORD”</text:p>
        </text:list-item>
        <text:list-item>
          <text:p text:style-name="P11">THEN READ <text:span text:style-name="T31">EXODUS 40:34</text:span> AND EXPLAIN WHERE “BEFORE <text:span text:style-name="T44">(IN FRONT OF) </text:span>THE LORD” WAS</text:p>
        </text:list-item>
        <text:list-item>
          <text:p text:style-name="P12">DRAW EXO 40:34 ON THE DIAGRAM <text:span text:style-name="T45">ABOVE THE SANCTUARY</text:span></text:p>
        </text:list-item>
        <text:list-item>
          <text:p text:style-name="P13">DRAW THE ARROW INDICATING WHAT IS BEFORE THE LORD ON THE DIAGRAM</text:p>
        </text:list-item>
      </text:list>
      <text:p text:style-name="P14"/>
      <text:p text:style-name="P15">Now that we’ve established which door is the “door of the tabernacle” what about the other door? There must be a different name for it right? I’m glad you asked. <text:span text:style-name="T46">READ</text:span> <text:span text:style-name="T47">Exodus 27:16</text:span><text:span text:style-name="T48">, </text:span><text:span text:style-name="T49">38:18</text:span><text:span text:style-name="T50">, </text:span><text:span text:style-name="T51">Numbers 4:26</text:span><text:span text:style-name="T46">.</text:span></text:p>
      <text:p text:style-name="P15"/>
      <text:p text:style-name="P15"><text:span text:style-name="T52">So now that we know where the woman were assembled t</text:span><text:span text:style-name="T53">here’s one more small </text:span><text:span text:style-name="T52">but important </text:span><text:span text:style-name="T53">detail we </text:span><text:span text:style-name="T54">that tells us </text:span><text:span text:style-name="T53">exactly where these woman were assembled. </text:span><text:span text:style-name="T55">There are 8 different words that all appear before the phrase “the door of the tabernacle of the congregation”. </text:span><text:span text:style-name="T56">READ THE 8 WORDS. </text:span><text:span text:style-name="T55">Does anyone remember which one applies to the woman in </text:span><text:span text:style-name="T57">Exo 38:8</text:span><text:span text:style-name="T55"> &amp; </text:span><text:span text:style-name="T57">1Sa 2:22</text:span><text:span text:style-name="T55">?</text:span></text:p>
      <table:table table:name="Table2" table:style-name="Table2">
        <table:table-column table:style-name="Table2.A"/>
        <table:table-column table:style-name="Table2.B"/>
        <table:table-row>
          <table:table-cell table:style-name="Table2.A1" office:value-type="string">
            <text:p text:style-name="P16">unto</text:p>
          </table:table-cell>
          <table:table-cell table:style-name="Table2.B1" table:number-rows-spanned="8" office:value-type="string">
            <text:p text:style-name="P16">the door of the tabernacle of the congregation</text:p>
          </table:table-cell>
        </table:table-row>
        <table:table-row>
          <table:table-cell table:style-name="Table2.A2" office:value-type="string">
            <text:p text:style-name="P16">by</text:p>
          </table:table-cell>
          <table:covered-table-cell table:style-name="Table2.B1"/>
        </table:table-row>
        <table:table-row>
          <table:table-cell table:style-name="Table2.A2" office:value-type="string">
            <text:p text:style-name="P17">at</text:p>
          </table:table-cell>
          <table:covered-table-cell table:style-name="Table2.B1"/>
        </table:table-row>
        <table:table-row>
          <table:table-cell table:style-name="Table2.A2" office:value-type="string">
            <text:p text:style-name="P18">to</text:p>
          </table:table-cell>
          <table:covered-table-cell table:style-name="Table2.B1"/>
        </table:table-row>
        <table:table-row>
          <table:table-cell table:style-name="Table2.A2" office:value-type="string">
            <text:p text:style-name="P19">of</text:p>
          </table:table-cell>
          <table:covered-table-cell table:style-name="Table2.B1"/>
        </table:table-row>
        <table:table-row>
          <table:table-cell table:style-name="Table2.A6" office:value-type="string">
            <text:p text:style-name="P19">from</text:p>
          </table:table-cell>
          <table:covered-table-cell table:style-name="Table2.B1"/>
        </table:table-row>
        <table:table-row>
          <table:table-cell table:style-name="Table2.A7" office:value-type="string">
            <text:p text:style-name="P20">for</text:p>
          </table:table-cell>
          <table:covered-table-cell table:style-name="Table2.B1"/>
        </table:table-row>
        <table:table-row>
          <table:table-cell table:style-name="Table2.A8" office:value-type="string">
            <text:p text:style-name="P21">before</text:p>
          </table:table-cell>
          <table:covered-table-cell table:style-name="Table2.B1"/>
        </table:table-row>
      </table:table>
      <text:p text:style-name="P22">Now that we know exactly where the woman were assembled that then opens the door <text:span text:style-name="T58">to find out</text:span> who they wer<text:span text:style-name="T58">e</text:span> and what were they doing. Assuming these woman were obeying the law we can check the law and see who was <text:span text:style-name="T58">permitted</text:span> to regularly be in this area.</text:p>
      <text:p text:style-name="P23"><text:soft-page-break/><text:span text:style-name="T59">From</text:span> Numbers <text:span text:style-name="T60">(</text:span><text:span text:style-name="T61">Numbers 18:1-7</text:span><text:span text:style-name="T62">) </text:span>and Leviticus <text:span text:style-name="T59">we learn that no Levite nor stranger was permitted to even come close to the vessels of both the sanctuary and the altar. </text:span><text:span text:style-name="T63">U</text:span><text:span text:style-name="T64">nless it was a specifically commanded occasion like a sacrifice </text:span><text:span text:style-name="T65">(</text:span><text:span text:style-name="T66">Lev 1:1-3</text:span><text:span text:style-name="T65">, </text:span><text:span text:style-name="T66">3:1,2</text:span><text:span text:style-name="T65">, </text:span><text:span text:style-name="T66">12:6,7</text:span><text:span text:style-name="T65">)</text:span><text:span text:style-name="T64">, the cleansing of a leper </text:span><text:span text:style-name="T65">(</text:span><text:span text:style-name="T66">Lev 14:11</text:span><text:span text:style-name="T65">)</text:span><text:span text:style-name="T64">, or a Nazarite shaving the head of his separation </text:span><text:span text:style-name="T65">(</text:span><text:span text:style-name="T66">Num 6:18</text:span><text:span text:style-name="T65">) </text:span><text:span text:style-name="T64">non-Levites were not permitted to wander about the court of the tabernacle let alone anywhere else inside (</text:span><text:span text:style-name="T67">Num 1:51</text:span><text:span text:style-name="T64">). </text:span><text:span text:style-name="T68">The tribes of Levi (Merari, Gershon, Kohath) were required to camp round about the entire tabernacle and part of </text:span><text:span text:style-name="T69">the duty of the men</text:span><text:span text:style-name="T68"> was to guard it that no wrath be upon the congregation of the children of Israel (</text:span><text:span text:style-name="T70">Num 1:53</text:span><text:span text:style-name="T68">).</text:span></text:p>
      <text:p text:style-name="P24"/>
      <text:p text:style-name="P25">Speaking of duty, now that we know these woman necessarily had to be Levites, let’s look at the duties given to <text:span text:style-name="T71">only </text:span><text:span text:style-name="T72">male Levites so we know what these woman were permitted to do</text:span><text:span text:style-name="T73">.</text:span></text:p>
      <text:p text:style-name="P25"/>
      <text:list xml:id="list1385312439" text:style-name="L2">
        <text:list-item>
          <text:p text:style-name="P26">All of the “<text:span text:style-name="T31">work</text:span> in the tabernacle of the congregation” was restricted to male Levites <text:span text:style-name="T74">(</text:span><text:span text:style-name="T75">Numbers 3:15</text:span><text:span text:style-name="T74">, </text:span><text:span text:style-name="T75">4:2,3</text:span><text:span text:style-name="T74">). </text:span><text:span text:style-name="T76">The word work here covers a broad range of </text:span><text:span text:style-name="T77">physical </text:span><text:span text:style-name="T76">activities and is the exact same Hebrew word used in </text:span><text:span text:style-name="T78">Exodus 20:9</text:span><text:span text:style-name="T76"> “</text:span><text:span text:style-name="T79">Six days shalt thou labour, and do all thy </text:span><text:span text:style-name="T80">work</text:span><text:span text:style-name="T79">:</text:span><text:span text:style-name="T76">”</text:span></text:p>
        </text:list-item>
      </text:list>
      <text:list text:style-name="L3">
        <text:list-item>
          <text:list>
            <text:list-item>
              <text:p text:style-name="P27">There are even many specifics given about this work for example the sons of Kohath were strictly forbidden from using wagons, unlike the Gersonites and Merarites, <text:span text:style-name="T81">and </text:span><text:span text:style-name="T82">they </text:span><text:span text:style-name="T81">were </text:span><text:span text:style-name="T83">required</text:span><text:span text:style-name="T81"> to carry their burdens on their shoulders.</text:span></text:p>
            </text:list-item>
          </text:list>
        </text:list-item>
      </text:list>
      <text:list text:continue-list="list1385312439" text:style-name="L2">
        <text:list-item>
          <text:p text:style-name="P28">The carrying of the various parts of the tabernacle when it was transported. While the Levite <text:span text:style-name="T84">males</text:span> were commanded to carry <text:span text:style-name="T85">all the</text:span> various parts <text:span text:style-name="T85">of the tabernacle divided by their families, </text:span>they were not permitted <text:span text:style-name="T86">to</text:span> touch any holy thing. <text:span text:style-name="T87">T</text:span><text:span text:style-name="T84">he priests covered </text:span><text:span text:style-name="T87">all </text:span><text:span text:style-name="T84">the holy things before the Levites picked them up. </text:span><text:span text:style-name="T88">Numbers 4:4-20</text:span><text:span text:style-name="T84">, </text:span><text:span text:style-name="T88">7:9</text:span><text:span text:style-name="T84">.</text:span></text:p>
        </text:list-item>
      </text:list>
      <text:p text:style-name="P29"/>
      <text:p text:style-name="P30">So, if the males were the only ones permitted to perform all the physical duties of the tabernacle what was left for these female Levites to do? <text:span text:style-name="T89">The simple version is anything </text:span><text:span text:style-name="T90">that was permitted on the sabbath day </text:span><text:span text:style-name="T91">but only permitted inside the </text:span><text:span text:style-name="T92">court of the </text:span><text:span text:style-name="T91">tabernacle</text:span><text:span text:style-name="T90">. But, </text:span><text:span text:style-name="T93">since that’s very general we’ll keeping digging. L</text:span><text:span text:style-name="T94">et’s have a look at the MT Hebrew for the word</text:span><text:span text:style-name="T95">s</text:span><text:span text:style-name="T94"> “assembl</text:span><text:span text:style-name="T95">ing</text:span><text:span text:style-name="T94">” </text:span><text:span text:style-name="T95">and “assembled”</text:span><text:span text:style-name="T94"> in </text:span><text:span text:style-name="T96">Exodus 38:8</text:span><text:span text:style-name="T94">.</text:span></text:p>
      <text:p text:style-name="P30"/>
      <text:list text:style-name="L4">
        <text:list-item>
          <text:p text:style-name="P31"><text:span text:style-name="T95">The Hebrew word behind “assembling” is Ha-tzov’ot which doesn’t mean much until we learn that this is the same </text:span><text:span text:style-name="T97">exact </text:span><text:span text:style-name="T98">Hebrew </text:span><text:span text:style-name="T95">word </text:span><text:span text:style-name="T98">behind</text:span><text:span text:style-name="T95"> “host” as in “The LORD of hosts”. This is a military term that </text:span><text:span text:style-name="T99">tells us </text:span><text:span text:style-name="T100">that this</text:span><text:span text:style-name="T95"> was not a casual gathering. </text:span><text:span text:style-name="T97">Other English words based on the same </text:span><text:span text:style-name="T101">Hebrew </text:span><text:span text:style-name="T97">root are: perform, wait, warred, mustered, fight, and fought.</text:span></text:p>
        </text:list-item>
        <text:list-item>
          <text:p text:style-name="P32">The Hebrew word behind “assembled” is Asher tzava’u which means “they marshaled” or “they served a term of military-like duty”.</text:p>
        </text:list-item>
      </text:list>
      <text:p text:style-name="P33"/>
      <text:p text:style-name="P34"><text:span text:style-name="T102">Further enlightening the mystery of these woman is that </text:span><text:span text:style-name="T103">in the Hebrew for </text:span><text:span text:style-name="T104">Exodus 38:8</text:span><text:span text:style-name="T103"> a specific type of Hebrew reduplication idiom is used called a “polyptoton”. </text:span><text:span text:style-name="T105">Polyptoton is a fancy word that means </text:span><text:span text:style-name="T106">that </text:span><text:span text:style-name="T105">“they used two different forms of the same root”. </text:span><text:span text:style-name="T107">Another type of Hebrew reduplication idiom is more easily recognized in the phrase “most holy” in </text:span><text:span text:style-name="T108">Exodus 26:33</text:span> which is called a superlative<text:span text:style-name="T107">. In the Hebrew it literally reads “holy of holies”. Sometimes, this reduplication idiom was translated directly into the English as </text:span><text:span text:style-name="T109">we can see </text:span><text:span text:style-name="T107">in the phrases “King of kings” or “Song of songs”. </text:span><text:span text:style-name="T110">So</text:span><text:span text:style-name="T111"> what does this </text:span><text:span text:style-name="T112">particular </text:span><text:span text:style-name="T111">idiom in the Hebrew tell us about </text:span><text:span text:style-name="T113">the woman in</text:span><text:span text:style-name="T111"> </text:span><text:span text:style-name="T114">Exodus 38:8</text:span><text:span text:style-name="T111">? Simply put, it identifies these woman not just as “workers” but instead as “office-holders”. And in the broader context in order to be an office-holder in the tabernacle one has to be appointed or ordained to that office: specifically by God.</text:span></text:p>
      <text:p text:style-name="P35"/>
      <text:p text:style-name="P36">Now we can go full circle and <text:span text:style-name="T115">put</text:span> everything we’ve gathered <text:span text:style-name="T115">into one basket and it tells us this: </text:span><text:span text:style-name="T116">those woman that assembled at the threshold of the tabernacle </text:span><text:span text:style-name="T117">before</text:span><text:span text:style-name="T116"> God</text:span><text:span text:style-name="T115"> were Levites that were ordained by God </text:span><text:span text:style-name="T117">for spiritual warfare </text:span><text:span text:style-name="T118">which is</text:span><text:span text:style-name="T119"> </text:span><text:span text:style-name="T120">studying the word of God, prayer, and fasting. </text:span><text:span text:style-name="T121">And let’s not forget that th</text:span><text:span text:style-name="T122">ose same </text:span><text:span text:style-name="T121">woman sacrificed their lookingglasses (or personal mirrors) for the purpose of creating a holy vessel for the tabernacle (the brass laver).</text:span></text:p>
      <text:p text:style-name="P36"/>
      <text:p text:style-name="P37">And lastly,</text:p>
      <text:p text:style-name="P38">In <text:span text:style-name="T31">1Sa 2:22</text:span> (along with <text:span text:style-name="T31">Jer 7:12-14</text:span>, and <text:span text:style-name="T31">Jer 26:6</text:span>) together with the archeological record at Shiloh, we learn that <text:span text:style-name="T123">after </text:span>the judges, the priests, and the guardians of the tabernacle <text:span text:style-name="T123">had compromised themselves, Shiloh was destroyed and burned </text:span><text:span text:style-name="T124">in God’s judgmen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3in" fo:margin-bottom="0.3in" fo:margin-left="0.3in" fo:margin-right="0.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10T10:51:21.752687747</meta:creation-date>
    <dc:title>default</dc:title>
    <meta:editing-duration>PT5H53M36S</meta:editing-duration>
    <meta:editing-cycles>159</meta:editing-cycles>
    <meta:generator>LibreOffice/26.2.4.2$Linux_X86_64 LibreOffice_project/64a984c51f4702dbd3710b13428c673a2f1292e7</meta:generator>
    <dc:date>2026-07-11T12:20:44.053446362</dc:date>
    <meta:document-statistic meta:table-count="2" meta:image-count="0" meta:object-count="0" meta:page-count="2" meta:paragraph-count="39" meta:word-count="1265" meta:character-count="7083" meta:non-whitespace-character-count="5867"/>
    <meta:template xlink:type="simple" xlink:actuate="onRequest" xlink:title="default" xlink:href="../../../../../Templates/default.ott" meta:date="2026-03-10T10:51:21.278303085"/>
  </office:meta>
</office:document-meta>
</file>