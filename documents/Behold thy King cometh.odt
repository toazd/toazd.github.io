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0.8076in" style:rel-column-width="6698*"/>
    </style:style>
    <style:style style:name="Table1.B" style:family="table-column">
      <style:table-column-properties style:column-width="2.6326in" style:rel-column-width="21839*"/>
    </style:style>
    <style:style style:name="Table1.C" style:family="table-column">
      <style:table-column-properties style:column-width="4.4597in" style:rel-column-width="3699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Gabriela" officeooo:rsid="001e6fb5" officeooo:paragraph-rsid="001e6fb5"/>
    </style:style>
    <style:style style:name="P2" style:family="paragraph" style:parent-style-name="Standard">
      <style:text-properties officeooo:rsid="001e6fb5" officeooo:paragraph-rsid="001e6fb5"/>
    </style:style>
    <style:style style:name="P3" style:family="paragraph" style:parent-style-name="Standard" style:list-style-name="L1">
      <style:text-properties officeooo:paragraph-rsid="0025dc5d"/>
    </style:style>
    <style:style style:name="P4" style:family="paragraph" style:parent-style-name="Standard" style:list-style-name="L1">
      <style:text-properties officeooo:rsid="00269d53" officeooo:paragraph-rsid="00269d53"/>
    </style:style>
    <style:style style:name="P5" style:family="paragraph" style:parent-style-name="Standard" style:list-style-name="L1">
      <style:text-properties officeooo:rsid="002a7a97" officeooo:paragraph-rsid="002a7a97"/>
    </style:style>
    <style:style style:name="P6" style:family="paragraph" style:parent-style-name="Standard" style:list-style-name="L1">
      <style:text-properties officeooo:paragraph-rsid="002c0714"/>
    </style:style>
    <style:style style:name="P7" style:family="paragraph" style:parent-style-name="Standard" style:list-style-name="L1">
      <style:text-properties officeooo:paragraph-rsid="002fc599"/>
    </style:style>
    <style:style style:name="P8" style:family="paragraph" style:parent-style-name="Standard" style:list-style-name="L1">
      <style:text-properties officeooo:rsid="002fc599" officeooo:paragraph-rsid="002fc599"/>
    </style:style>
    <style:style style:name="P9" style:family="paragraph" style:parent-style-name="Standard">
      <style:text-properties officeooo:rsid="0021b1ca" officeooo:paragraph-rsid="0021b1ca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3c7018" officeooo:paragraph-rsid="003c7018" style:font-weight-asian="bold" style:font-weight-complex="bold"/>
    </style:style>
    <style:style style:name="P11" style:family="paragraph" style:parent-style-name="Table_20_Contents">
      <style:text-properties fo:color="#127622" loext:opacity="100%" officeooo:rsid="00360e4a" officeooo:paragraph-rsid="00360e4a"/>
    </style:style>
    <style:style style:name="P12" style:family="paragraph" style:parent-style-name="Table_20_Contents">
      <style:text-properties officeooo:rsid="00360e4a" officeooo:paragraph-rsid="00360e4a"/>
    </style:style>
    <style:style style:name="P13" style:family="paragraph" style:parent-style-name="Table_20_Contents">
      <style:text-properties officeooo:rsid="00360e4a" officeooo:paragraph-rsid="005751a6"/>
    </style:style>
    <style:style style:name="P14" style:family="paragraph" style:parent-style-name="Table_20_Contents">
      <style:text-properties officeooo:rsid="003b94fc" officeooo:paragraph-rsid="003b94fc"/>
    </style:style>
    <style:style style:name="P15" style:family="paragraph" style:parent-style-name="Standard" style:list-style-name="L2">
      <style:text-properties officeooo:paragraph-rsid="007d4d42"/>
    </style:style>
    <style:style style:name="T1" style:family="text">
      <style:text-properties fo:color="#127622" loext:opacity="100%"/>
    </style:style>
    <style:style style:name="T2" style:family="text">
      <style:text-properties fo:color="#127622" loext:opacity="100%" officeooo:rsid="0058b0a7"/>
    </style:style>
    <style:style style:name="T3" style:family="text">
      <style:text-properties officeooo:rsid="006f7dbb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6dc4df"/>
    </style:style>
    <style:style style:name="T6" style:family="text">
      <style:text-properties officeooo:rsid="006de9bd"/>
    </style:style>
    <style:style style:name="T7" style:family="text">
      <style:text-properties officeooo:rsid="0021b1ca"/>
    </style:style>
    <style:style style:name="T8" style:family="text">
      <style:text-properties officeooo:rsid="005a1fa8"/>
    </style:style>
    <style:style style:name="T9" style:family="text">
      <style:text-properties fo:color="#127622" loext:opacity="100%" officeooo:rsid="0021b1ca"/>
    </style:style>
    <style:style style:name="T10" style:family="text">
      <style:text-properties officeooo:rsid="00253350"/>
    </style:style>
    <style:style style:name="T11" style:family="text">
      <style:text-properties fo:font-style="italic" officeooo:rsid="00253350" style:font-style-asian="italic" style:font-style-complex="italic"/>
    </style:style>
    <style:style style:name="T12" style:family="text">
      <style:text-properties officeooo:rsid="0022a8ae"/>
    </style:style>
    <style:style style:name="T13" style:family="text">
      <style:text-properties fo:color="#127622" loext:opacity="100%" officeooo:rsid="0022a8ae"/>
    </style:style>
    <style:style style:name="T14" style:family="text">
      <style:text-properties fo:color="#127622" loext:opacity="100%" officeooo:rsid="0042c170"/>
    </style:style>
    <style:style style:name="T15" style:family="text">
      <style:text-properties officeooo:rsid="0042c170"/>
    </style:style>
    <style:style style:name="T16" style:family="text">
      <style:text-properties officeooo:rsid="00269d53"/>
    </style:style>
    <style:style style:name="T17" style:family="text">
      <style:text-properties officeooo:rsid="0025dc5d"/>
    </style:style>
    <style:style style:name="T18" style:family="text">
      <style:text-properties officeooo:rsid="005b23b4"/>
    </style:style>
    <style:style style:name="T19" style:family="text">
      <style:text-properties officeooo:rsid="00282b80"/>
    </style:style>
    <style:style style:name="T20" style:family="text">
      <style:text-properties officeooo:rsid="003089d2"/>
    </style:style>
    <style:style style:name="T21" style:family="text">
      <style:text-properties officeooo:rsid="00449c8c"/>
    </style:style>
    <style:style style:name="T22" style:family="text">
      <style:text-properties fo:color="#127622" loext:opacity="100%" officeooo:rsid="003089d2"/>
    </style:style>
    <style:style style:name="T23" style:family="text">
      <style:text-properties fo:font-style="italic" officeooo:rsid="00282b80" style:font-style-asian="italic" style:font-style-complex="italic"/>
    </style:style>
    <style:style style:name="T24" style:family="text">
      <style:text-properties fo:font-style="normal" officeooo:rsid="00282b80" style:font-style-asian="normal" style:font-style-complex="normal"/>
    </style:style>
    <style:style style:name="T25" style:family="text">
      <style:text-properties fo:color="#127622" loext:opacity="100%" officeooo:rsid="00282b80"/>
    </style:style>
    <style:style style:name="T26" style:family="text">
      <style:text-properties fo:color="#127622" loext:opacity="100%" officeooo:rsid="002914de"/>
    </style:style>
    <style:style style:name="T27" style:family="text">
      <style:text-properties officeooo:rsid="002914de"/>
    </style:style>
    <style:style style:name="T28" style:family="text">
      <style:text-properties officeooo:rsid="0045674d"/>
    </style:style>
    <style:style style:name="T29" style:family="text">
      <style:text-properties officeooo:rsid="0047262f"/>
    </style:style>
    <style:style style:name="T30" style:family="text">
      <style:text-properties officeooo:rsid="0047f80f"/>
    </style:style>
    <style:style style:name="T31" style:family="text">
      <style:text-properties officeooo:rsid="0031d331"/>
    </style:style>
    <style:style style:name="T32" style:family="text">
      <style:text-properties fo:color="#ff0000" loext:opacity="100%" officeooo:rsid="002fc599"/>
    </style:style>
    <style:style style:name="T33" style:family="text">
      <style:text-properties officeooo:rsid="002b1994"/>
    </style:style>
    <style:style style:name="T34" style:family="text">
      <style:text-properties officeooo:rsid="00306d6d"/>
    </style:style>
    <style:style style:name="T35" style:family="text">
      <style:text-properties officeooo:rsid="0061a83b"/>
    </style:style>
    <style:style style:name="T36" style:family="text">
      <style:text-properties officeooo:rsid="0049c7d0"/>
    </style:style>
    <style:style style:name="T37" style:family="text">
      <style:text-properties officeooo:rsid="004d949f"/>
    </style:style>
    <style:style style:name="T38" style:family="text">
      <style:text-properties officeooo:rsid="004e691b"/>
    </style:style>
    <style:style style:name="T39" style:family="text">
      <style:text-properties officeooo:rsid="002c0714"/>
    </style:style>
    <style:style style:name="T40" style:family="text">
      <style:text-properties officeooo:rsid="002f7b38"/>
    </style:style>
    <style:style style:name="T41" style:family="text">
      <style:text-properties officeooo:rsid="0062daf9"/>
    </style:style>
    <style:style style:name="T42" style:family="text">
      <style:text-properties fo:color="#127622" loext:opacity="100%" officeooo:rsid="0062daf9"/>
    </style:style>
    <style:style style:name="T43" style:family="text">
      <style:text-properties fo:color="#127622" loext:opacity="100%" officeooo:rsid="002c0714"/>
    </style:style>
    <style:style style:name="T44" style:family="text">
      <style:text-properties fo:color="#127622" loext:opacity="100%" officeooo:rsid="002f7b38"/>
    </style:style>
    <style:style style:name="T45" style:family="text">
      <style:text-properties fo:color="#127622" loext:opacity="100%" officeooo:rsid="002d35e3"/>
    </style:style>
    <style:style style:name="T46" style:family="text">
      <style:text-properties fo:color="#127622" loext:opacity="100%" officeooo:rsid="0063d133"/>
    </style:style>
    <style:style style:name="T47" style:family="text">
      <style:text-properties officeooo:rsid="002fc599"/>
    </style:style>
    <style:style style:name="T48" style:family="text">
      <style:text-properties officeooo:rsid="006452af"/>
    </style:style>
    <style:style style:name="T49" style:family="text">
      <style:text-properties fo:font-style="italic" officeooo:rsid="002fc599" style:font-style-asian="italic" style:font-style-complex="italic"/>
    </style:style>
    <style:style style:name="T50" style:family="text">
      <style:text-properties fo:font-style="italic" officeooo:rsid="0080a48b" style:font-style-asian="italic" style:font-style-complex="italic"/>
    </style:style>
    <style:style style:name="T51" style:family="text">
      <style:text-properties fo:font-style="normal" officeooo:rsid="0080a48b" style:font-style-asian="normal" style:font-style-complex="normal"/>
    </style:style>
    <style:style style:name="T52" style:family="text">
      <style:text-properties fo:color="#127622" loext:opacity="100%" officeooo:rsid="002fc599"/>
    </style:style>
    <style:style style:name="T53" style:family="text">
      <style:text-properties officeooo:rsid="0080a48b"/>
    </style:style>
    <style:style style:name="T54" style:family="text">
      <style:text-properties officeooo:rsid="0080feaa"/>
    </style:style>
    <style:style style:name="T55" style:family="text">
      <style:text-properties fo:font-style="normal" officeooo:rsid="0083762a" style:font-style-asian="normal" style:font-style-complex="normal"/>
    </style:style>
    <style:style style:name="T56" style:family="text">
      <style:text-properties fo:color="#127622" loext:opacity="100%" fo:font-style="normal" officeooo:rsid="0083762a" style:font-style-asian="normal" style:font-style-complex="normal"/>
    </style:style>
    <style:style style:name="T57" style:family="text">
      <style:text-properties officeooo:rsid="0065ce6a"/>
    </style:style>
    <style:style style:name="T58" style:family="text">
      <style:text-properties officeooo:rsid="0067861e"/>
    </style:style>
    <style:style style:name="T59" style:family="text">
      <style:text-properties officeooo:rsid="0083b570"/>
    </style:style>
    <style:style style:name="T60" style:family="text">
      <style:text-properties officeooo:rsid="006606e7"/>
    </style:style>
    <style:style style:name="T61" style:family="text">
      <style:text-properties officeooo:rsid="00845b7b"/>
    </style:style>
    <style:style style:name="T62" style:family="text">
      <style:text-properties fo:color="#ff0000" loext:opacity="100%" officeooo:rsid="0032f086"/>
    </style:style>
    <style:style style:name="T63" style:family="text">
      <style:text-properties officeooo:rsid="0032f086"/>
    </style:style>
    <style:style style:name="T64" style:family="text">
      <style:text-properties officeooo:rsid="0034939e"/>
    </style:style>
    <style:style style:name="T65" style:family="text">
      <style:text-properties officeooo:rsid="00360e4a"/>
    </style:style>
    <style:style style:name="T66" style:family="text">
      <style:text-properties officeooo:rsid="005286bd"/>
    </style:style>
    <style:style style:name="T67" style:family="text">
      <style:text-properties officeooo:rsid="003708b0"/>
    </style:style>
    <style:style style:name="T68" style:family="text">
      <style:text-properties fo:color="#127622" loext:opacity="100%" officeooo:rsid="003708b0"/>
    </style:style>
    <style:style style:name="T69" style:family="text">
      <style:text-properties officeooo:rsid="0038d15d"/>
    </style:style>
    <style:style style:name="T70" style:family="text">
      <style:text-properties officeooo:rsid="00540827"/>
    </style:style>
    <style:style style:name="T71" style:family="text">
      <style:text-properties officeooo:rsid="007166d8"/>
    </style:style>
    <style:style style:name="T72" style:family="text">
      <style:text-properties officeooo:rsid="0069a030"/>
    </style:style>
    <style:style style:name="T73" style:family="text">
      <style:text-properties fo:background-color="#ffff00" loext:char-shading-value="0"/>
    </style:style>
    <style:style style:name="T74" style:family="text">
      <style:text-properties officeooo:rsid="005751a6" fo:background-color="#ffff00" loext:char-shading-value="0"/>
    </style:style>
    <style:style style:name="T75" style:family="text">
      <style:text-properties officeooo:rsid="005751a6"/>
    </style:style>
    <style:style style:name="T76" style:family="text">
      <style:text-properties officeooo:rsid="00522f04"/>
    </style:style>
    <style:style style:name="T77" style:family="text">
      <style:text-properties fo:font-style="italic" officeooo:rsid="00522f04" style:font-style-asian="italic" style:font-style-complex="italic"/>
    </style:style>
    <style:style style:name="T78" style:family="text">
      <style:text-properties fo:font-style="italic" officeooo:rsid="0055a0f6" style:font-style-asian="italic" style:font-style-complex="italic"/>
    </style:style>
    <style:style style:name="T79" style:family="text">
      <style:text-properties fo:font-style="italic" officeooo:rsid="005650cc" style:font-style-asian="italic" style:font-style-complex="italic"/>
    </style:style>
    <style:style style:name="T80" style:family="text">
      <style:text-properties officeooo:rsid="00504c8c"/>
    </style:style>
    <style:style style:name="T81" style:family="text">
      <style:text-properties fo:font-style="italic" officeooo:rsid="00566511" style:font-style-asian="italic" style:font-style-complex="italic"/>
    </style:style>
    <style:style style:name="T82" style:family="text">
      <style:text-properties officeooo:rsid="00771a15" fo:background-color="#ffff00" loext:char-shading-value="0"/>
    </style:style>
    <style:style style:name="T83" style:family="text">
      <style:text-properties fo:font-style="italic" officeooo:rsid="005751a6" style:font-style-asian="italic" style:font-style-complex="italic"/>
    </style:style>
    <style:style style:name="T84" style:family="text">
      <style:text-properties officeooo:rsid="00818691"/>
    </style:style>
    <style:style style:name="T85" style:family="text">
      <style:text-properties officeooo:rsid="007d4d42"/>
    </style:style>
    <style:style style:name="T86" style:family="text">
      <style:text-properties officeooo:rsid="008561a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hold! thy King cometh</text:p>
      <text:p text:style-name="Standard"/>
      <text:p text:style-name="P2">The prophecy in <text:span text:style-name="T1">Zech</text:span><text:span text:style-name="T2">ariah</text:span><text:span text:style-name="T1"> 9:9</text:span> presents us with an interesting <text:span text:style-name="T3">situation</text:span> because none of the gospels <text:span text:style-name="T4">explicitly</text:span> tell us when Jesus rode on the female (mother) ass (<text:span text:style-name="T1">Matthew 21:2,3</text:span>) <text:span text:style-name="T5">and yet the prophecy require</text:span><text:span text:style-name="T6">d</text:span><text:span text:style-name="T5"> that Jesus rode on each of them (either together or separately).</text:span></text:p>
      <text:p text:style-name="P2"/>
      <text:list text:style-name="L1">
        <text:list-item>
          <text:p text:style-name="P3"><text:span text:style-name="T7">The journey began with Jesus and His disciples </text:span><text:span text:style-name="T8">[walking]</text:span><text:span text:style-name="T7"> from Bethany (</text:span><text:span text:style-name="T9">John 12:1</text:span><text:span text:style-name="T7">) </text:span><text:span text:style-name="T10">until He and the “</text:span><text:span text:style-name="T11">multitude of disciples</text:span><text:span text:style-name="T10">” with Him </text:span><text:span text:style-name="T7">(</text:span><text:span text:style-name="T9">Luke 19:37</text:span><text:span text:style-name="T7">) </text:span><text:span text:style-name="T10">were close to</text:span><text:span text:style-name="T12"> Bethany and</text:span><text:span text:style-name="T7"> Bethphage (</text:span><text:span text:style-name="T13">Luke 19:29</text:span><text:span text:style-name="T12">, </text:span><text:span text:style-name="T13">Mat</text:span><text:span text:style-name="T14">thew</text:span><text:span text:style-name="T13"> 21:1</text:span><text:span text:style-name="T12">, </text:span><text:span text:style-name="T13">Mark 11:1</text:span><text:span text:style-name="T12">; both villages were on the eastern slope/</text:span><text:span text:style-name="T15">side</text:span><text:span text:style-name="T12"> of the </text:span><text:span text:style-name="T16">m</text:span><text:span text:style-name="T12">ount of </text:span><text:span text:style-name="T16">O</text:span><text:span text:style-name="T12">lives</text:span><text:span text:style-name="T7">).</text:span></text:p>
        </text:list-item>
        <text:list-item>
          <text:p text:style-name="P3"><text:span text:style-name="T7">Jesus sends two </text:span><text:span text:style-name="T17">of the </text:span><text:span text:style-name="T7">disciples </text:span><text:span text:style-name="T17">to a nearby village </text:span><text:span text:style-name="T7">to </text:span><text:span text:style-name="T18">get</text:span><text:span text:style-name="T7"> the female ass and her colt (</text:span><text:span text:style-name="T9">Mat 21:2,3</text:span><text:span text:style-name="T7">).</text:span></text:p>
        </text:list-item>
        <text:list-item>
          <text:p text:style-name="P4">Before descending the western side of the mount of Olives (<text:span text:style-name="T1">Luke 19:35-37</text:span>) <text:span text:style-name="T19">the ass and her colt were brought to Jesus, </text:span><text:span text:style-name="T20">they were both covered with </text:span><text:span text:style-name="T21">the disciples’ </text:span><text:span text:style-name="T20">clothes (</text:span><text:span text:style-name="T22">Matthew 21:7</text:span><text:span text:style-name="T20">), </text:span><text:span text:style-name="T19">and He sat on the colt (“</text:span><text:span text:style-name="T23">young ass</text:span><text:span text:style-name="T24">”</text:span><text:span text:style-name="T19">; </text:span><text:span text:style-name="T25">John 12:14</text:span><text:span text:style-name="T19">, </text:span><text:span text:style-name="T25">Luke 19:35</text:span><text:span text:style-name="T19">, </text:span><text:span text:style-name="T25">Mark 11:7</text:span><text:span text:style-name="T19">; </text:span><text:span text:style-name="T26">Matthew</text:span><text:span text:style-name="T27"> does not specify which </text:span><text:span text:style-name="T28">ass that</text:span><text:span text:style-name="T27"> Jesus sat on, only that He sat on the clothes</text:span><text:span text:style-name="T19">).</text:span></text:p>
        </text:list-item>
        <text:list-item>
          <text:p text:style-name="P5">The disciples spread their clothes in the way (<text:span text:style-name="T1">Luke 19:36</text:span>) <text:span text:style-name="T29">during the ascent </text:span><text:span text:style-name="T30">up the eastern side and/or the </text:span><text:span text:style-name="T29">crossing of the plateau of the mount of Olives.</text:span></text:p>
        </text:list-item>
        <text:list-item>
          <text:p text:style-name="P5">The steep descent down the <text:span text:style-name="T31">western side of the </text:span>mount of Olives is now the only opportunity<text:span text:style-name="T32">*</text:span><text:span text:style-name="T33"> </text:span>for Jesus to ride the <text:span text:style-name="T34">mother</text:span> ass and so <text:span text:style-name="T35">[probably] </text:span>He does. The colt <text:span text:style-name="T36">follows it’s mother </text:span><text:span text:style-name="T37">and learns how to navigate the terrain </text:span><text:span text:style-name="T38">without a burden</text:span><text:span text:style-name="T37">.</text:span></text:p>
        </text:list-item>
        <text:list-item>
          <text:p text:style-name="P6"><text:span text:style-name="T39">Much people from Jerusalem </text:span><text:span text:style-name="T40">(there for the feast; </text:span><text:span text:style-name="T41">and those that witnessed Lazarus’ resurrection </text:span><text:span text:style-name="T42">John 12:17,18</text:span><text:span text:style-name="T40">) </text:span><text:span text:style-name="T39">come out to meet Jesus as He is approaching with branches of palm trees (</text:span><text:span text:style-name="T43">John 12:12,13</text:span>, <text:span text:style-name="T44">Matthew 21:8</text:span><text:span text:style-name="T40">, </text:span><text:span text:style-name="T45">Mark 11:8</text:span><text:span text:style-name="T46">)</text:span></text:p>
        </text:list-item>
        <text:list-item>
          <text:p text:style-name="P7"><text:span text:style-name="T47">At some point </text:span><text:span text:style-name="T48">before entering Jerusalem, </text:span><text:span text:style-name="T47">Jesus</text:span><text:span text:style-name="T49"> </text:span><text:span text:style-name="T50">finds</text:span><text:span text:style-name="T51"> a young ass and sits on it</text:span><text:span text:style-name="T49"> </text:span><text:span text:style-name="T47">(</text:span><text:span text:style-name="T52">John 12:14</text:span><text:span text:style-name="T47">). </text:span><text:span text:style-name="T53">Since the prophecy </text:span><text:span text:style-name="T54">wa</text:span><text:span text:style-name="T53">s already fulfilled He </text:span><text:span text:style-name="T50">finds</text:span><text:span text:style-name="T51"> “</text:span><text:span text:style-name="T50">a young ass</text:span><text:span text:style-name="T51">” and not “</text:span><text:span text:style-name="T50">the young ass</text:span><text:span text:style-name="T51">”. </text:span><text:span text:style-name="T55">Because of </text:span><text:span text:style-name="T56">John 12:15</text:span><text:span text:style-name="T55"> it may have been the same colt that He was riding at the beginning of the journey.</text:span></text:p>
        </text:list-item>
        <text:list-item>
          <text:p text:style-name="P8">He enters into Jerusalem and heads for the temple <text:span text:style-name="T57">(</text:span><text:span text:style-name="T58">it is </text:span><text:span text:style-name="T57">unknown when he dismounted the </text:span><text:span text:style-name="T59">young ass</text:span><text:span text:style-name="T57"> </text:span><text:span text:style-name="T60">but it was </text:span><text:span text:style-name="T61">probably</text:span><text:span text:style-name="T60"> before entering the temple</text:span><text:span text:style-name="T57">).</text:span></text:p>
        </text:list-item>
      </text:list>
      <text:p text:style-name="P9"/>
      <text:p text:style-name="Standard"><text:span text:style-name="T62">*</text:span> <text:span text:style-name="T63">This restriction is created because of one simple fact </text:span><text:span text:style-name="T64">in scripture: </text:span><text:span text:style-name="T65">first, we take the group</text:span><text:span text:style-name="T66">s</text:span><text:span text:style-name="T65"> of people that cried </text:span><text:span text:style-name="T67">(</text:span><text:span text:style-name="T68">Mat 21:9</text:span><text:span text:style-name="T67">, </text:span><text:span text:style-name="T68">Mar 11:9,10</text:span><text:span text:style-name="T67">, </text:span><text:span text:style-name="T68">Luke 19:38</text:span><text:span text:style-name="T67">, </text:span><text:span text:style-name="T68">John 12:13</text:span><text:span text:style-name="T67">)</text:span><text:span text:style-name="T65">. If we </text:span><text:span text:style-name="T69">look at</text:span><text:span text:style-name="T65"> </text:span><text:span text:style-name="T70">the groups</text:span><text:span text:style-name="T65"> of people as an anchor point in time </text:span><text:span text:style-name="T70">(</text:span><text:span text:style-name="T71">from </text:span><text:span text:style-name="T70">before the descent down the western side of the mount of Olives </text:span><text:span text:style-name="T71">to</text:span><text:span text:style-name="T70"> before entering Jerusalem) </text:span><text:span text:style-name="T65">and </text:span><text:span text:style-name="T69">then </text:span><text:span text:style-name="T65">look at all four gospels we notice something </text:span><text:span text:style-name="T69">very </text:span><text:span text:style-name="T65">interesting in the order of events: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Book</text:p>
          </table:table-cell>
          <table:table-cell table:style-name="Table1.A1" office:value-type="string">
            <text:p text:style-name="P10">Step 1</text:p>
          </table:table-cell>
          <table:table-cell table:style-name="Table1.C1" office:value-type="string">
            <text:p text:style-name="P10">Step 2</text:p>
          </table:table-cell>
        </table:table-row>
        <table:table-row>
          <table:table-cell table:style-name="Table1.A2" office:value-type="string">
            <text:p text:style-name="P11">Matthew</text:p>
          </table:table-cell>
          <table:table-cell table:style-name="Table1.A2" office:value-type="string">
            <text:p text:style-name="P12">Jesus gets on one <text:span text:style-name="T72">(or both) </text:span>of the asses</text:p>
          </table:table-cell>
          <table:table-cell table:style-name="Table1.C2" office:value-type="string">
            <text:p text:style-name="P12"><text:span text:style-name="T73">The crowd </text:span><text:span text:style-name="T74">from Jerusalem</text:span><text:span text:style-name="T75"> </text:span><text:span text:style-name="T76">and the disciples cried</text:span> “<text:span text:style-name="T4">Hosanna </text:span><text:span text:style-name="T77">to the Son of David: Blessed is he that cometh in the name of the Lord; Hosanna in the highest</text:span>”</text:p>
          </table:table-cell>
        </table:table-row>
        <table:table-row>
          <table:table-cell table:style-name="Table1.A2" office:value-type="string">
            <text:p text:style-name="P11">Mark</text:p>
          </table:table-cell>
          <table:table-cell table:style-name="Table1.A2" office:value-type="string">
            <text:p text:style-name="P12">Jesus gets on the colt</text:p>
          </table:table-cell>
          <table:table-cell table:style-name="Table1.C2" office:value-type="string">
            <text:p text:style-name="P13"><text:span text:style-name="T73">The crowd </text:span><text:span text:style-name="T74">from Jerusalem</text:span><text:span text:style-name="T75"> </text:span><text:span text:style-name="T76">and the disciples cried</text:span> “<text:span text:style-name="T78">Hosanna: Blessed is he that cometh in the name of the Lord: Blessed be the kingdom of our father David, that cometh in the name of the Lord: </text:span><text:span text:style-name="T79">Hosanna in the highest.</text:span>”</text:p>
          </table:table-cell>
        </table:table-row>
        <table:table-row>
          <table:table-cell table:style-name="Table1.A2" office:value-type="string">
            <text:p text:style-name="P11">Luke</text:p>
          </table:table-cell>
          <table:table-cell table:style-name="Table1.A2" office:value-type="string">
            <text:p text:style-name="P12">Jesus gets on the colt</text:p>
          </table:table-cell>
          <table:table-cell table:style-name="Table1.C2" office:value-type="string">
            <text:p text:style-name="P12">The <text:span text:style-name="T80">disciples said with a loud voice</text:span> “<text:span text:style-name="T81">Blessed be the King that cometh in the name of the Lord: peace in heaven, and glory in the highest.</text:span>”</text:p>
          </table:table-cell>
        </table:table-row>
        <table:table-row>
          <table:table-cell table:style-name="Table1.A2" office:value-type="string">
            <text:p text:style-name="P11">John</text:p>
          </table:table-cell>
          <table:table-cell table:style-name="Table1.A2" office:value-type="string">
            <text:p text:style-name="P13"><text:span text:style-name="T74">The crow</text:span><text:span text:style-name="T82">d</text:span><text:span text:style-name="T73"> </text:span><text:span text:style-name="T74">from Jerusalem</text:span><text:span text:style-name="T75"> cried “</text:span><text:span text:style-name="T83">Hosanna: Blessed is the King of Israel that cometh in the name of the Lord</text:span><text:span text:style-name="T75">”. </text:span></text:p>
          </table:table-cell>
          <table:table-cell table:style-name="Table1.C2" office:value-type="string">
            <text:p text:style-name="P14">Jesus gets on <text:span text:style-name="T84">a</text:span> young ass</text:p>
          </table:table-cell>
        </table:table-row>
      </table:table>
      <text:list text:style-name="L2">
        <text:list-item>
          <text:p text:style-name="P15"><text:span text:style-name="T85">Jesus was on a colt/young ass both before and after the anchor point </text:span><text:span text:style-name="T86">leaving only one opportunity to ride the mother ass: the descent of the western side of the mount of Olives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9T14:14:52.516583300</meta:creation-date>
    <dc:title>default</dc:title>
    <meta:editing-duration>PT1H55M31S</meta:editing-duration>
    <meta:editing-cycles>106</meta:editing-cycles>
    <meta:generator>LibreOffice/26.2.4.2$Linux_X86_64 LibreOffice_project/64a984c51f4702dbd3710b13428c673a2f1292e7</meta:generator>
    <dc:date>2026-07-11T12:29:51.862681100</dc:date>
    <meta:document-statistic meta:table-count="1" meta:image-count="0" meta:object-count="0" meta:page-count="1" meta:paragraph-count="27" meta:word-count="636" meta:character-count="3454" meta:non-whitespace-character-count="2853"/>
    <meta:template xlink:type="simple" xlink:actuate="onRequest" xlink:title="default" xlink:href="../../AppData/Roaming/LibreOffice/4/user/template/default1.ott" meta:date="2026-03-29T14:14:52.398255700"/>
  </office:meta>
</office:document-meta>
</file>