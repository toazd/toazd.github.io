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8000003E7B80722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7.8972in" table:align="center" style:shadow="#808080 0.0403in 0.0403in"/>
    </style:style>
    <style:style style:name="Table5.A" style:family="table-column">
      <style:table-column-properties style:column-width="1.3757in"/>
    </style:style>
    <style:style style:name="Table5.B" style:family="table-column">
      <style:table-column-properties style:column-width="4.4333in"/>
    </style:style>
    <style:style style:name="Table5.C" style:family="table-column">
      <style:table-column-properties style:column-width="2.0882in"/>
    </style:style>
    <style:style style:name="Table5.A1" style:family="table-cell">
      <style:table-cell-properties style:vertical-align="middle" fo:padding="0.0313in" fo:border-left="1.5pt double-thin #000000" fo:border-right="none" fo:border-top="1.5pt double-thin #000000" fo:border-bottom="1.5pt double-thin #000000"/>
    </style:style>
    <style:style style:name="Table5.C1" style:family="table-cell">
      <style:table-cell-properties style:vertical-align="middle" fo:padding="0.0313in" fo:border="1.5pt double-thin #000000"/>
    </style:style>
    <style:style style:name="Table5.A2" style:family="table-cell">
      <style:table-cell-properties style:vertical-align="middle" fo:padding="0.0313in" fo:border-left="1.5pt double-thin #000000" fo:border-right="none" fo:border-top="none" fo:border-bottom="1.5pt double-thin #000000"/>
    </style:style>
    <style:style style:name="Table5.C2" style:family="table-cell">
      <style:table-cell-properties style:vertical-align="middle" fo:padding="0.0313in" fo:border-left="1.5pt double-thin #000000" fo:border-right="1.5pt double-thin #000000" fo:border-top="none" fo:border-bottom="1.5pt double-thin #000000"/>
    </style:style>
    <style:style style:name="Table4" style:family="table">
      <style:table-properties style:width="7.8597in" table:align="margins" style:shadow="#808080 0.0403in 0.0403in"/>
    </style:style>
    <style:style style:name="Table4.A" style:family="table-column">
      <style:table-column-properties style:column-width="7.8597in" style:rel-column-width="65535*"/>
    </style:style>
    <style:style style:name="Table4.A1" style:family="table-cell">
      <style:table-cell-properties style:border-line-width="0.0021in 0.0021in 0.0021in" fo:padding="0.0382in" fo:border="0.45pt double #000000"/>
    </style:style>
    <style:style style:name="Table4.A2" style:family="table-cell">
      <style:table-cell-properties style:border-line-width-left="0.0021in 0.0021in 0.0021in" style:border-line-width-right="0.0021in 0.0021in 0.0021in" style:border-line-width-bottom="0.0021in 0.0021in 0.0021in" fo:padding="0.0382in" fo:border-left="0.45pt double #000000" fo:border-right="0.45pt double #000000" fo:border-top="none" fo:border-bottom="0.45pt double #000000"/>
    </style:style>
    <style:style style:name="P1" style:family="paragraph" style:parent-style-name="Standard">
      <style:text-properties style:font-name="Liberation Sans" fo:font-size="12pt" officeooo:rsid="0027037e" officeooo:paragraph-rsid="0027037e" style:font-size-asian="12pt" style:font-name-complex="Liberation Sans" style:font-size-complex="12pt"/>
    </style:style>
    <style:style style:name="P2" style:family="paragraph" style:parent-style-name="Standard">
      <style:text-properties fo:color="#127622" loext:opacity="100%" style:font-name="Gabriela Nerd Font" fo:font-size="12pt" style:font-size-asian="12pt" style:font-name-complex="Liberation Sans" style:font-size-complex="12pt"/>
    </style:style>
    <style:style style:name="P3" style:family="paragraph" style:parent-style-name="Standard">
      <style:text-properties officeooo:rsid="00213ca3" officeooo:paragraph-rsid="00213ca3"/>
    </style:style>
    <style:style style:name="P4" style:family="paragraph" style:parent-style-name="Standard">
      <style:text-properties officeooo:rsid="00262f17" officeooo:paragraph-rsid="00262f17"/>
    </style:style>
    <style:style style:name="P5" style:family="paragraph" style:parent-style-name="Standard">
      <style:text-properties officeooo:rsid="003538a2" officeooo:paragraph-rsid="003538a2"/>
    </style:style>
    <style:style style:name="P6" style:family="paragraph" style:parent-style-name="Standard">
      <style:text-properties officeooo:rsid="0030cd4c" officeooo:paragraph-rsid="0030cd4c"/>
    </style:style>
    <style:style style:name="P7" style:family="paragraph" style:parent-style-name="Standard">
      <style:text-properties officeooo:rsid="0037296d" officeooo:paragraph-rsid="00378354"/>
    </style:style>
    <style:style style:name="P8" style:family="paragraph" style:parent-style-name="Standard">
      <style:text-properties officeooo:rsid="00385049" officeooo:paragraph-rsid="00385049"/>
    </style:style>
    <style:style style:name="P9" style:family="paragraph" style:parent-style-name="Standard">
      <style:paragraph-properties fo:text-align="center" style:justify-single-word="false"/>
    </style:style>
    <style:style style:name="P10" style:family="paragraph" style:parent-style-name="Standard">
      <style:text-properties style:font-name="Liberation Sans" fo:font-size="12pt" style:font-size-asian="12pt" style:font-name-complex="Liberation Sans" style:font-size-complex="12pt"/>
    </style:style>
    <style:style style:name="P11" style:family="paragraph" style:parent-style-name="Table_20_Contents">
      <style:text-properties style:font-name="Liberation Sans" fo:font-size="12pt" officeooo:paragraph-rsid="000e65b5" style:font-size-asian="12pt" style:font-name-complex="Liberation Sans" style:font-size-complex="12pt"/>
    </style:style>
    <style:style style:name="P12" style:family="paragraph" style:parent-style-name="Table_20_Contents">
      <style:text-properties style:font-name="Liberation Sans" fo:font-size="12pt" officeooo:paragraph-rsid="0014a686" style:font-size-asian="12pt" style:font-name-complex="Liberation Sans" style:font-size-complex="12pt"/>
    </style:style>
    <style:style style:name="P13" style:family="paragraph" style:parent-style-name="Table_20_Contents">
      <style:paragraph-properties fo:text-align="center" style:justify-single-word="false"/>
      <style:text-properties style:font-name="Liberation Sans" fo:font-size="12pt" officeooo:paragraph-rsid="000e65b5" style:font-size-asian="12pt" style:font-name-complex="Liberation Sans" style:font-size-complex="12pt"/>
    </style:style>
    <style:style style:name="T1" style:family="text">
      <style:text-properties officeooo:rsid="00288c07"/>
    </style:style>
    <style:style style:name="T2" style:family="text">
      <style:text-properties officeooo:rsid="002a5116"/>
    </style:style>
    <style:style style:name="T3" style:family="text">
      <style:text-properties officeooo:rsid="002adf20"/>
    </style:style>
    <style:style style:name="T4" style:family="text">
      <style:text-properties officeooo:rsid="002aebc9"/>
    </style:style>
    <style:style style:name="T5" style:family="text">
      <style:text-properties officeooo:rsid="002e32b5"/>
    </style:style>
    <style:style style:name="T6" style:family="text">
      <style:text-properties style:text-position="super 58%"/>
    </style:style>
    <style:style style:name="T7" style:family="text">
      <style:text-properties fo:background-color="#fff5ce" loext:char-shading-value="0"/>
    </style:style>
    <style:style style:name="T8" style:family="text">
      <style:text-properties style:font-name="Liberation Sans" fo:font-size="12pt" style:font-size-asian="12pt" style:font-name-complex="Liberation Sans" style:font-size-complex="12pt"/>
    </style:style>
    <style:style style:name="T9" style:family="text">
      <style:text-properties officeooo:rsid="003538a2"/>
    </style:style>
    <style:style style:name="T10" style:family="text">
      <style:text-properties style:text-position="super 58%" officeooo:rsid="003538a2"/>
    </style:style>
    <style:style style:name="T11" style:family="text">
      <style:text-properties officeooo:rsid="0031aa48"/>
    </style:style>
    <style:style style:name="T12" style:family="text">
      <style:text-properties officeooo:rsid="00378354"/>
    </style:style>
    <style:style style:name="T13" style:family="text">
      <style:text-properties officeooo:rsid="001c0091"/>
    </style:style>
    <style:style style:name="T14" style:family="text">
      <style:text-properties officeooo:rsid="001c187a"/>
    </style:style>
    <style:style style:name="T15" style:family="text">
      <style:text-properties officeooo:rsid="001c77b2"/>
    </style:style>
    <style:style style:name="T16" style:family="text">
      <style:text-properties style:text-position="super 58%" officeooo:rsid="0014a686"/>
    </style:style>
    <style:style style:name="T17" style:family="text">
      <style:text-properties officeooo:rsid="0014a686"/>
    </style:style>
    <style:style style:name="T18" style:family="text">
      <style:text-properties fo:background-color="#ffff00" loext:char-shading-value="0"/>
    </style:style>
    <style:style style:name="T19" style:family="text">
      <style:text-properties style:text-position="super 58%" officeooo:rsid="000e65b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rding to Biblemapper 3.0, Maon was a city ~0.9 miles south of Carmel in southern Judah, <text:span text:style-name="T1">~8.2 miles south of Hebron, </text:span><text:span text:style-name="T2">~10.2 miles south of Mamre, </text:span><text:span text:style-name="T3">~20.8 miles south of Bathlehem, </text:span><text:span text:style-name="T4">~25.7 miles south of Jerusalem, </text:span><text:span text:style-name="T5">~20.7 miles northeast of Beersheba.</text:span></text:p>
      <text:p text:style-name="P1"/>
      <text:p text:style-name="P1"><draw:frame draw:style-name="fr1" draw:name="Image1" text:anchor-type="as-char" svg:width="7.8236in" svg:height="8.0736in" draw:z-index="0"><draw:image xlink:href="Pictures/10000001000003C8000003E7B8072222.png" xlink:type="simple" xlink:show="embed" xlink:actuate="onLoad" draw:mime-type="image/png"/></draw:frame></text:p>
      <text:p text:style-name="P1"/>
      <text:p text:style-name="P1"/>
      <text:p text:style-name="P1"/>
      <text:p text:style-name="P1"/>
      <text:p text:style-name="P1"/>
      <text:p text:style-name="P1"/>
      <text:p text:style-name="P1"/>
      <table:table table:name="Table5" table:style-name="Table5">
        <table:table-column table:style-name="Table5.A"/>
        <table:table-column table:style-name="Table5.B"/>
        <table:table-column table:style-name="Table5.C"/>
        <text:soft-page-break/>
        <table:table-row>
          <table:table-cell table:style-name="Table5.A1" office:value-type="string">
            <text:p text:style-name="P2">Jos 15:55</text:p>
          </table:table-cell>
          <table:table-cell table:style-name="Table5.A1" office:value-type="string">
            <text:p text:style-name="Standard"><text:span text:style-name="T6">55</text:span> <text:span text:style-name="T7">Maon</text:span><text:span text:style-name="T6">H4584</text:span><text:span text:style-name="T8">, Carmel, and Ziph, and Juttah,</text:span></text:p>
          </table:table-cell>
          <table:table-cell table:style-name="Table5.C1" office:value-type="string">
            <text:p text:style-name="P3">A city in the mountains of the inheritance of Judah</text:p>
          </table:table-cell>
        </table:table-row>
        <table:table-row>
          <table:table-cell table:style-name="Table5.A2" office:value-type="string">
            <text:p text:style-name="P2">Jdg 10:12</text:p>
          </table:table-cell>
          <table:table-cell table:style-name="Table5.A2" office:value-type="string">
            <text:p text:style-name="Standard">The Zidonians also, and the Amalekites, and the <text:span text:style-name="T7">Maonites</text:span><text:span text:style-name="T6">H4584</text:span>, did oppress you; and ye cried to me, and I delivered you out of their hand.</text:p>
          </table:table-cell>
          <table:table-cell table:style-name="Table5.C2" office:value-type="string">
            <text:p text:style-name="P4">Roughly 18 years after the judge Jair dies, the LORD refers to past oppressors that He delivered the children of Israel from</text:p>
          </table:table-cell>
        </table:table-row>
        <table:table-row>
          <table:table-cell table:style-name="Table5.A2" office:value-type="string">
            <text:p text:style-name="P2">1Sa 23:24,<text:span text:style-name="T9">25</text:span></text:p>
          </table:table-cell>
          <table:table-cell table:style-name="Table5.A2" office:value-type="string">
            <text:p text:style-name="Standard"><text:span text:style-name="T10">24</text:span><text:span text:style-name="T9"> </text:span>And they arose, and went to Ziph before Saul: but David and his men were in the wilderness of <text:span text:style-name="T7">Maon</text:span><text:span text:style-name="T6">H4584</text:span>, in the plain on the south of Jeshimon.</text:p>
            <text:p text:style-name="P5"><text:span text:style-name="T6">25</text:span> Saul also and his men went to seek him. And they told David: wherefore he came down into a rock, and abode in the wilderness of <text:span text:style-name="T7">Maon</text:span><text:span text:style-name="T6">H4584</text:span>. And when Saul heard that, he pursued after David in the wilderness of <text:span text:style-name="T7">Maon</text:span><text:span text:style-name="T6">H4584</text:span>.</text:p>
          </table:table-cell>
          <table:table-cell table:style-name="Table5.C2" office:value-type="string">
            <text:p text:style-name="P6">After David saves Keilah, the Ziphites tell Saul <text:span text:style-name="T11">that </text:span>David is hiding in the hill of Hachilah but David is in the wilderness of Maon</text:p>
          </table:table-cell>
        </table:table-row>
        <table:table-row>
          <table:table-cell table:style-name="Table5.A2" office:value-type="string">
            <text:p text:style-name="P2">1Sa 25:2</text:p>
          </table:table-cell>
          <table:table-cell table:style-name="Table5.A2" office:value-type="string">
            <text:p text:style-name="Standard">And there was a man in <text:span text:style-name="T7">Maon</text:span><text:span text:style-name="T6">H4584</text:span>, whose possessions were in Carmel; and the man was very great, and he had three thousand sheep, and a thousand goats: and he was shearing his sheep in Carmel.</text:p>
          </table:table-cell>
          <table:table-cell table:style-name="Table5.C2" office:value-type="string">
            <text:p text:style-name="P7">Nabal (Abigail’s husband; the future wife of David) <text:span text:style-name="T12">was from Maon and is referred to as a “son/man of Belial” that cannot be reasoned with.</text:span></text:p>
          </table:table-cell>
        </table:table-row>
        <table:table-row>
          <table:table-cell table:style-name="Table5.A2" office:value-type="string">
            <text:p text:style-name="P2">1Ch 2:45</text:p>
          </table:table-cell>
          <table:table-cell table:style-name="Table5.A2" office:value-type="string">
            <text:p text:style-name="Standard">And the son of Shammai was <text:span text:style-name="T7">Maon</text:span><text:span text:style-name="T6">H4584</text:span>: and <text:span text:style-name="T7">Maon</text:span><text:span text:style-name="T6">H4584</text:span> was the father of Bethzur.</text:p>
          </table:table-cell>
          <table:table-cell table:style-name="Table5.C2" office:value-type="string">
            <text:p text:style-name="P8">Maon is listed as a descendant of Judah son of Jacob/Israel.</text:p>
          </table:table-cell>
        </table:table-row>
        <table:table-row>
          <table:table-cell table:style-name="Table5.C2" table:number-columns-spanned="3" office:value-type="string">
            <text:p text:style-name="P9">H4584</text:p>
            <text:p text:style-name="P9">מָעֹון (Mâʻôwn | maw-ohn')</text:p>
            <text:p text:style-name="P9">Derivation: the same as מָעֹון <text:span text:style-name="T13">(H4583)</text:span>; a residence;</text:p>
            <text:p text:style-name="P9">Strong's: Maon, the name of an Israelite and of a place in Palestine</text:p>
            <text:p text:style-name="P9">KJV: Maon, Maonites. Compare בֵּית בַּעַל מְעֹון, מְעוּנִי <text:span text:style-name="T14">(H1010, </text:span><text:span text:style-name="T15">H4586</text:span><text:span text:style-name="T14">)</text:span></text:p>
            <text:p text:style-name="P9">Typo: lemma מְעוּנָי third vowel, corrected to מְעוּנִי</text:p>
          </table:table-cell>
          <table:covered-table-cell/>
          <table:covered-table-cell/>
        </table:table-row>
      </table:table>
      <text:p text:style-name="P10"/>
      <table:table table:name="Table4" table:style-name="Table4">
        <table:table-column table:style-name="Table4.A"/>
        <table:table-row>
          <table:table-cell table:style-name="Table4.A1" office:value-type="string">
            <text:p text:style-name="P2">Ezra 2:1,50</text:p>
            <text:p text:style-name="P11"><text:span text:style-name="T16">2</text:span><text:span text:style-name="T17"> </text:span>Now these are the children of the province that went up out of the captivity, of those which had been carried away, whom Nebuchadnezzar the king of Babylon had carried away unto Babylon, and came again unto Jerusalem and Judah, every one unto his city;</text:p>
            <text:p text:style-name="P12"><text:span text:style-name="T16">50</text:span><text:span text:style-name="T17"> </text:span>The children of Asnah, the children of <text:span text:style-name="T18">Mehunim</text:span><text:span text:style-name="T19">H4586</text:span>, the children of Nephusim,</text:p>
          </table:table-cell>
        </table:table-row>
        <table:table-row>
          <table:table-cell table:style-name="Table4.A2" office:value-type="string">
            <text:p text:style-name="P13">H4586</text:p>
            <text:p text:style-name="P13">מְעוּנִי (Mᵉʻûwnîy | meh-oo-nee')</text:p>
            <text:p text:style-name="P13">Typo: lemma מְעוּנָי third vowel, corrected to מְעוּנִי</text:p>
            <text:p text:style-name="P13">Derivation: or מְעִינִי; probably patrial from מָעֹון <text:span text:style-name="T17">(H4584)</text:span>;</text:p>
            <text:p text:style-name="P13">Strong's: a Meunite, or inhabitant of Maon (only in plural)</text:p>
            <text:p text:style-name="P13">KJV: Mehunim(-s), Meunim.</text:p>
          </table:table-cell>
        </table:table-row>
      </table:table>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18T06:26:17.542000000</meta:creation-date>
    <meta:editing-cycles>44</meta:editing-cycles>
    <meta:editing-duration>PT18H57M34S</meta:editing-duration>
    <dc:date>2026-07-11T12:31:32.326281473</dc:date>
    <meta:generator>LibreOffice/26.2.4.2$Linux_X86_64 LibreOffice_project/64a984c51f4702dbd3710b13428c673a2f1292e7</meta:generator>
    <meta:document-statistic meta:table-count="2" meta:image-count="1" meta:object-count="0" meta:page-count="2" meta:paragraph-count="33" meta:word-count="436" meta:character-count="2447" meta:non-whitespace-character-count="2043"/>
  </office:meta>
</office:document-meta>
</file>