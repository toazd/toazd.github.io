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file-entry manifest:full-path="Fonts/Font_Gabriela_1.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vg:font-face-src>
        <svg:font-face-uri xlink:href="Fonts/Font_Gabriela_1.ttf" xlink:type="simple" loext:font-style="normal" loext:font-weight="normal">
          <svg:font-face-format svg:string="truetype"/>
        </svg:font-face-uri>
      </svg:font-face-src>
    </style:font-fac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75pt solid #000000"/>
    </style:style>
    <style:style style:name="Table2" style:family="table">
      <style:table-properties style:width="8.2in" table:align="margins"/>
    </style:style>
    <style:style style:name="Table2.A" style:family="table-column">
      <style:table-column-properties style:column-width="8.2in" style:rel-column-width="65535*"/>
    </style:style>
    <style:style style:name="Table2.1" style:family="table-row">
      <style:table-row-properties fo:keep-together="always"/>
    </style:style>
    <style:style style:name="Table2.A1" style:family="table-cell">
      <style:table-cell-properties fo:padding="0.0382in" fo:border="0.75pt solid #000000"/>
    </style:style>
    <style:style style:name="Table2.A2" style:family="table-cell">
      <style:table-cell-properties fo:padding="0.0382in" fo:border-left="0.75pt solid #000000" fo:border-right="0.75pt solid #000000" fo:border-top="none" fo:border-bottom="0.75pt solid #000000"/>
    </style:style>
    <style:style style:name="Table4" style:family="table">
      <style:table-properties style:width="8.2in" table:align="margins"/>
    </style:style>
    <style:style style:name="Table4.A" style:family="table-column">
      <style:table-column-properties style:column-width="8.2in" style:rel-column-width="65535*"/>
    </style:style>
    <style:style style:name="Table4.1" style:family="table-row">
      <style:table-row-properties fo:keep-together="always"/>
    </style:style>
    <style:style style:name="Table4.A1" style:family="table-cell">
      <style:table-cell-properties fo:padding="0.0382in" fo:border="0.75pt solid #000000"/>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1" style:family="table-row">
      <style:table-row-properties fo:keep-together="always"/>
    </style:style>
    <style:style style:name="Table5.A1" style:family="table-cell">
      <style:table-cell-properties fo:padding="0.0382in" fo:border="0.7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3262f4" officeooo:paragraph-rsid="003262f4" style:font-size-asian="14pt" style:font-size-complex="14pt"/>
    </style:style>
    <style:style style:name="P2" style:family="paragraph" style:parent-style-name="Standard">
      <style:text-properties officeooo:rsid="003473bc" officeooo:paragraph-rsid="003993ea"/>
    </style:style>
    <style:style style:name="P3" style:family="paragraph" style:parent-style-name="Standard">
      <style:text-properties fo:font-style="normal" officeooo:rsid="00382b30" officeooo:paragraph-rsid="003993ea" style:font-style-asian="normal" style:font-style-complex="normal"/>
    </style:style>
    <style:style style:name="P4" style:family="paragraph" style:parent-style-name="Standard">
      <style:text-properties fo:font-style="normal" officeooo:rsid="00727b75" officeooo:paragraph-rsid="00727b75" style:font-style-asian="normal" style:font-style-complex="normal"/>
    </style:style>
    <style:style style:name="P5" style:family="paragraph" style:parent-style-name="Table_20_Contents">
      <style:text-properties fo:color="#127622" loext:opacity="100%" style:font-name="Gabriela"/>
    </style:style>
    <style:style style:name="P6" style:family="paragraph" style:parent-style-name="Table_20_Contents">
      <style:text-properties officeooo:paragraph-rsid="003ac861"/>
    </style:style>
    <style:style style:name="P7" style:family="paragraph" style:parent-style-name="Standard">
      <style:text-properties officeooo:paragraph-rsid="003b554e"/>
    </style:style>
    <style:style style:name="P8" style:family="paragraph" style:parent-style-name="Table_20_Contents">
      <style:text-properties officeooo:paragraph-rsid="00220d66"/>
    </style:style>
    <style:style style:name="P9" style:family="paragraph" style:parent-style-name="Standard">
      <style:text-properties officeooo:rsid="00476f88" officeooo:paragraph-rsid="00476f88"/>
    </style:style>
    <style:style style:name="P10" style:family="paragraph" style:parent-style-name="Standard">
      <style:text-properties officeooo:rsid="004e01e0" officeooo:paragraph-rsid="004e01e0"/>
    </style:style>
    <style:style style:name="P11" style:family="paragraph" style:parent-style-name="Table_20_Contents">
      <style:text-properties officeooo:paragraph-rsid="004cccd5"/>
    </style:style>
    <style:style style:name="P12" style:family="paragraph" style:parent-style-name="Standard">
      <style:text-properties officeooo:paragraph-rsid="006bc508"/>
    </style:style>
    <style:style style:name="P13" style:family="paragraph" style:parent-style-name="Standard">
      <style:text-properties officeooo:rsid="00517fae" officeooo:paragraph-rsid="006bc508"/>
    </style:style>
    <style:style style:name="P14" style:family="paragraph" style:parent-style-name="Standard">
      <style:paragraph-properties fo:text-align="center" style:justify-single-word="false"/>
      <style:text-properties officeooo:paragraph-rsid="003262f4"/>
    </style:style>
    <style:style style:name="P15" style:family="paragraph" style:parent-style-name="Standard">
      <style:paragraph-properties fo:text-align="center" style:justify-single-word="false"/>
      <style:text-properties officeooo:rsid="003262f4" officeooo:paragraph-rsid="003262f4"/>
    </style:style>
    <style:style style:name="P16" style:family="paragraph" style:parent-style-name="Table_20_Contents">
      <style:text-properties officeooo:paragraph-rsid="0030958c"/>
    </style:style>
    <style:style style:name="P17" style:family="paragraph" style:parent-style-name="Standard">
      <style:text-properties officeooo:rsid="0066cdc4" officeooo:paragraph-rsid="0066cdc4"/>
    </style:style>
    <style:style style:name="P18" style:family="paragraph" style:parent-style-name="Standard">
      <style:text-properties officeooo:paragraph-rsid="006e2247"/>
    </style:style>
    <style:style style:name="P19" style:family="paragraph" style:parent-style-name="Standard">
      <style:text-properties officeooo:rsid="00833777" officeooo:paragraph-rsid="00833777"/>
    </style:style>
    <style:style style:name="T1" style:family="text">
      <style:text-properties officeooo:rsid="007acd64"/>
    </style:style>
    <style:style style:name="T2" style:family="text">
      <style:text-properties officeooo:rsid="003521b0"/>
    </style:style>
    <style:style style:name="T3" style:family="text">
      <style:text-properties officeooo:rsid="00382b30"/>
    </style:style>
    <style:style style:name="T4" style:family="text">
      <style:text-properties fo:font-style="italic" officeooo:rsid="003521b0" style:font-style-asian="italic" style:font-style-complex="italic"/>
    </style:style>
    <style:style style:name="T5" style:family="text">
      <style:text-properties fo:font-style="normal" officeooo:rsid="003521b0" style:font-style-asian="normal" style:font-style-complex="normal"/>
    </style:style>
    <style:style style:name="T6" style:family="text">
      <style:text-properties fo:font-style="normal" officeooo:rsid="003700d7" style:font-style-asian="normal" style:font-style-complex="normal"/>
    </style:style>
    <style:style style:name="T7" style:family="text">
      <style:text-properties fo:font-style="normal" officeooo:rsid="00382b30" style:font-style-asian="normal" style:font-style-complex="normal"/>
    </style:style>
    <style:style style:name="T8" style:family="text">
      <style:text-properties officeooo:rsid="00727c05"/>
    </style:style>
    <style:style style:name="T9" style:family="text">
      <style:text-properties fo:background-color="#ffff00" loext:char-shading-value="0"/>
    </style:style>
    <style:style style:name="T10" style:family="text">
      <style:text-properties fo:background-color="transparent" loext:char-shading-value="0"/>
    </style:style>
    <style:style style:name="T11" style:family="text">
      <style:text-properties fo:font-weight="bold" fo:background-color="#ffff00" loext:char-shading-value="0" style:font-weight-asian="bold" style:font-weight-complex="bold"/>
    </style:style>
    <style:style style:name="T12" style:family="text">
      <style:text-properties fo:font-weight="bold" fo:background-color="#fff5ce" loext:char-shading-value="0" style:font-weight-asian="bold" style:font-weight-complex="bold"/>
    </style:style>
    <style:style style:name="T13" style:family="text">
      <style:text-properties fo:background-color="#fff5ce" loext:char-shading-value="0"/>
    </style:style>
    <style:style style:name="T14" style:family="text">
      <style:text-properties officeooo:rsid="003ac861"/>
    </style:style>
    <style:style style:name="T15" style:family="text">
      <style:text-properties style:text-position="super 58%" officeooo:rsid="003ac861"/>
    </style:style>
    <style:style style:name="T16" style:family="text">
      <style:text-properties fo:color="#127622" loext:opacity="100%" style:font-name="Gabriela"/>
    </style:style>
    <style:style style:name="T17" style:family="text">
      <style:text-properties officeooo:rsid="003b554e"/>
    </style:style>
    <style:style style:name="T18" style:family="text">
      <style:text-properties style:text-underline-style="solid" style:text-underline-width="auto" style:text-underline-color="font-color" officeooo:rsid="0040df28"/>
    </style:style>
    <style:style style:name="T19" style:family="text">
      <style:text-properties officeooo:rsid="003d1d56"/>
    </style:style>
    <style:style style:name="T20" style:family="text">
      <style:text-properties officeooo:rsid="003e1833"/>
    </style:style>
    <style:style style:name="T21" style:family="text">
      <style:text-properties officeooo:rsid="0045adf3"/>
    </style:style>
    <style:style style:name="T22" style:family="text">
      <style:text-properties officeooo:rsid="003f4872"/>
    </style:style>
    <style:style style:name="T23" style:family="text">
      <style:text-properties style:text-position="33% 80%"/>
    </style:style>
    <style:style style:name="T24" style:family="text">
      <style:text-properties fo:font-style="italic"/>
    </style:style>
    <style:style style:name="T25" style:family="text">
      <style:text-properties fo:background-color="#dee6ef" loext:char-shading-value="0"/>
    </style:style>
    <style:style style:name="T26" style:family="text">
      <style:text-properties fo:background-color="#f7d1d5" loext:char-shading-value="0"/>
    </style:style>
    <style:style style:name="T27" style:family="text">
      <style:text-properties fo:font-style="italic" fo:background-color="#f7d1d5" loext:char-shading-value="0"/>
    </style:style>
    <style:style style:name="T28" style:family="text">
      <style:text-properties officeooo:rsid="0048549f"/>
    </style:style>
    <style:style style:name="T29" style:family="text">
      <style:text-properties officeooo:rsid="004a4696"/>
    </style:style>
    <style:style style:name="T30" style:family="text">
      <style:text-properties officeooo:rsid="004e01e0"/>
    </style:style>
    <style:style style:name="T31" style:family="text">
      <style:text-properties officeooo:rsid="005c3f10"/>
    </style:style>
    <style:style style:name="T32" style:family="text">
      <style:text-properties officeooo:rsid="005a8159"/>
    </style:style>
    <style:style style:name="T33" style:family="text">
      <style:text-properties officeooo:rsid="00805d5a"/>
    </style:style>
    <style:style style:name="T34" style:family="text">
      <style:text-properties style:text-underline-style="none" fo:background-color="#fff5ce" loext:char-shading-value="0"/>
    </style:style>
    <style:style style:name="T35" style:family="text">
      <style:text-properties style:text-position="33% 80%" fo:background-color="transparent" loext:char-shading-value="0"/>
    </style:style>
    <style:style style:name="T36" style:family="text">
      <style:text-properties officeooo:rsid="005258e7"/>
    </style:style>
    <style:style style:name="T37" style:family="text">
      <style:text-properties officeooo:rsid="005e2a6f"/>
    </style:style>
    <style:style style:name="T38" style:family="text">
      <style:text-properties style:text-position="super 58%" officeooo:rsid="005e2a6f"/>
    </style:style>
    <style:style style:name="T39" style:family="text">
      <style:text-properties officeooo:rsid="005e7d66"/>
    </style:style>
    <style:style style:name="T40" style:family="text">
      <style:text-properties officeooo:rsid="00612901"/>
    </style:style>
    <style:style style:name="T41" style:family="text">
      <style:text-properties officeooo:rsid="005c6c6a"/>
    </style:style>
    <style:style style:name="T42" style:family="text">
      <style:text-properties officeooo:rsid="005f3b37"/>
    </style:style>
    <style:style style:name="T43" style:family="text">
      <style:text-properties officeooo:rsid="005fa406"/>
    </style:style>
    <style:style style:name="T44" style:family="text">
      <style:text-properties officeooo:rsid="0061f96c"/>
    </style:style>
    <style:style style:name="T45" style:family="text">
      <style:text-properties officeooo:rsid="00517fae"/>
    </style:style>
    <style:style style:name="T46" style:family="text">
      <style:text-properties officeooo:rsid="0065e3cd"/>
    </style:style>
    <style:style style:name="T47" style:family="text">
      <style:text-properties officeooo:rsid="0069f188"/>
    </style:style>
    <style:style style:name="T48" style:family="text">
      <style:text-properties officeooo:rsid="006ce727"/>
    </style:style>
    <style:style style:name="T49" style:family="text">
      <style:text-properties officeooo:rsid="006feaad"/>
    </style:style>
    <style:style style:name="T50" style:family="text">
      <style:text-properties officeooo:rsid="006e2247"/>
    </style:style>
    <style:style style:name="T51" style:family="text">
      <style:text-properties fo:color="#127622" loext:opacity="100%"/>
    </style:style>
    <style:style style:name="T52" style:family="text">
      <style:text-properties style:text-position="super 58%"/>
    </style:style>
    <style:style style:name="T53" style:family="text">
      <style:text-properties fo:background-color="#ffff00" loext:char-shading-value="0"/>
    </style:style>
    <style:style style:name="T54" style:family="text">
      <style:text-properties fo:background-color="#fff5c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d the Pharaoh of the exodus survive the Red sea crossing?</text:p>
      <text:p text:style-name="Standard"/>
      <text:p text:style-name="P2">History, and even some “christian” sources, <text:span text:style-name="T1">claim</text:span> that the Pharaoh of the exodus survived the Red sea crossing. <text:span text:style-name="T2">They offer compelling “evidence” such as the date on a </text:span><text:span text:style-name="T3">wine juglet</text:span><text:span text:style-name="T2"> in </text:span><text:span text:style-name="T3">Amenhotep II’s Theban funerary temple</text:span><text:span text:style-name="T2">, Amenhotep II’s </text:span><text:span text:style-name="T4">estimated</text:span><text:span text:style-name="T5"> lifespan from xrays of his mummified corpse, </text:span><text:span text:style-name="T6">Thutmose IV’s Lateran Obelisk, </text:span><text:span text:style-name="T7">and more.</text:span></text:p>
      <text:p text:style-name="P3"/>
      <text:p text:style-name="P4">But, what does God’s word <text:span text:style-name="T8">tell us</text:span>?</text:p>
      <text:p text:style-name="Standard"/>
      <text:p text:style-name="Standard"/>
      <table:table table:name="Table1" table:style-name="Table1">
        <table:table-column table:style-name="Table1.A"/>
        <table:table-row>
          <table:table-cell table:style-name="Table1.A1" office:value-type="string">
            <text:p text:style-name="P5">Exodus 9:13-15</text:p>
            <text:p text:style-name="P6">13 And the LORD said unto Moses, Rise up early in the morning, and stand before <text:span text:style-name="T9">Pharaoh</text:span>, and say unto <text:span text:style-name="T9">him</text:span>, Thus saith the LORD God of the Hebrews, Let my people go, that they may serve me.</text:p>
            <text:p text:style-name="P6">14 For I will at this time send all my plagues upon <text:span text:style-name="T9">thine</text:span> heart, and upon <text:span text:style-name="T9">thy</text:span> servants, and upon <text:span text:style-name="T9">thy</text:span> people; that <text:span text:style-name="T9">thou</text:span> mayest know that there is none like me in all the earth.</text:p>
            <text:p text:style-name="P6">15 For now I will stretch out my hand, <text:span text:style-name="T10">that I may smite </text:span><text:span text:style-name="T9">thee</text:span> and <text:span text:style-name="T9">thy</text:span> people with pestilence; and <text:span text:style-name="T11">thou</text:span><text:span text:style-name="T12"> shalt be cut off from the earth</text:span><text:span text:style-name="T13">.</text:span></text:p>
          </table:table-cell>
        </table:table-row>
      </table:table>
      <text:p text:style-name="Standard"/>
      <text:p text:style-name="P7"><text:span text:style-name="T14">After the 6</text:span><text:span text:style-name="T15">th</text:span><text:span text:style-name="T14"> judgment against the gods of Egypt (</text:span><text:span text:style-name="T16">Exo 12:12</text:span><text:span text:style-name="T14">) </text:span><text:span text:style-name="T17">the LORD speaking </text:span><text:span text:style-name="T18">to</text:span><text:span text:style-name="T17"> Pharaoh through Moses pronounces that “thou [Pharaoh] shalt be cut off from the earth”. </text:span><text:span text:style-name="T19">If you weren’t already aware, the phrase “cut off from the earth” means that Pharaoh is going to die. </text:span><text:span text:style-name="T20">Since </text:span><text:span text:style-name="T21">here </text:span><text:span text:style-name="T20">the LORD doesn’t tell us how or when </text:span><text:span text:style-name="T22">that will happen </text:span><text:span text:style-name="T20">we must continue </text:span><text:span text:style-name="T22">onward to find that.</text:span></text:p>
      <text:p text:style-name="Standard"/>
      <table:table table:name="Table2" table:style-name="Table2">
        <table:table-column table:style-name="Table2.A"/>
        <table:table-row table:style-name="Table2.1">
          <table:table-cell table:style-name="Table2.A1" office:value-type="string">
            <text:p text:style-name="Table_20_Contents"><text:span text:style-name="T16">Exodus 12:33-37</text:span><text:line-break/><text:span text:style-name="T23">33</text:span> And the Egyptians were urgent upon the people, that they might send them out of the land in haste; for they said, We <text:span text:style-name="T24">be</text:span> all dead <text:span text:style-name="T24">men</text:span>. <text:line-break/><text:span text:style-name="T23">34</text:span> And the people took their dough before it was leavened, their kneadingtroughs being bound up in their clothes upon their shoulders. <text:line-break/><text:span text:style-name="T23">35</text:span> And the children of Israel did according to the word of Moses; and they borrowed of the Egyptians jewels of silver, and jewels of gold, and raiment: <text:line-break/><text:span text:style-name="T23">36</text:span> And the LORD gave the people favour in the sight of the Egyptians, so that they lent unto them <text:span text:style-name="T24">such things as they required</text:span>. And they spoiled the Egyptians. <text:line-break/><text:span text:style-name="T23">37</text:span> <text:span text:style-name="T13">And the children of Israel journeyed from Rameses to Succoth</text:span>, about six hundred thousand on foot <text:span text:style-name="T24">that were</text:span> men, beside children.</text:p>
          </table:table-cell>
        </table:table-row>
        <table:table-row table:style-name="Table2.1">
          <table:table-cell table:style-name="Table2.A2" office:value-type="string">
            <text:p text:style-name="P5">Exodus 13:20</text:p>
            <text:p text:style-name="P8">And they took their journey <text:span text:style-name="T13">from Succoth, and encamped in Etham</text:span>, in the edge of the wilderness.</text:p>
          </table:table-cell>
        </table:table-row>
        <table:table-row table:style-name="Table2.1">
          <table:table-cell table:style-name="Table2.A2" office:value-type="string">
            <text:p text:style-name="P8"><text:span text:style-name="T16">Exodus 14:2-4</text:span><text:line-break/><text:span text:style-name="T23">2</text:span> Speak unto the children of Israel, that they <text:span text:style-name="T13">turn and encamp before Pi-hahiroth, between Migdol and the sea, over against Baal-zephon</text:span>: before it shall ye encamp by the sea. <text:line-break/><text:span text:style-name="T23">3</text:span> For Pharaoh will say of the <text:span text:style-name="T25">children of Israel</text:span>, They <text:span text:style-name="T24">are</text:span> entangled in the land, the wilderness hath shut them in. <text:line-break/><text:span text:style-name="T23">4</text:span> And I will harden Pharaoh's heart, that <text:span text:style-name="T9">he shall follow after </text:span><text:span text:style-name="T25">them</text:span>; and <text:span text:style-name="T9">I will be honoured upon Pharaoh</text:span>, and upon all his host; <text:span text:style-name="T26">that the Egyptians may know that I </text:span><text:span text:style-name="T27">am</text:span><text:span text:style-name="T26"> the LORD</text:span>. And they did so.</text:p>
          </table:table-cell>
        </table:table-row>
      </table:table>
      <text:p text:style-name="Standard"/>
      <text:p text:style-name="P9">After the exodus of the children of Isr<text:span text:style-name="T28">a</text:span>el from Egypt <text:span text:style-name="T28">begins, </text:span>we learn about where the<text:span text:style-name="T28">y</text:span> traveled. <text:span text:style-name="T29">Interestingly, the LORD leads them to a place that led Pharaoh to believe that they were trapped by the land. But, more importantly for the question at hand, we are told that Pharaoh will follow after them (the children of Israel).</text:span></text:p>
      <text:p text:style-name="Standard"/>
      <text:p text:style-name="Standard"/>
      <text:p text:style-name="Standard"/>
      <table:table table:name="Table4" table:style-name="Table4">
        <table:table-column table:style-name="Table4.A"/>
        <table:table-header-rows>
          <text:soft-page-break/>
          <table:table-row table:style-name="Table4.1">
            <table:table-cell table:style-name="Table4.A1" office:value-type="string">
              <text:p text:style-name="P8"><text:span text:style-name="T16">Exodus 14:5-28</text:span><text:line-break/><text:span text:style-name="T23">5</text:span> And it was told the <text:span text:style-name="T9">king of Egypt</text:span> that the people fled: and the heart of <text:span text:style-name="T9">Pharaoh</text:span> and of <text:span text:style-name="T9">his</text:span> servants was turned against the people, and they said, Why have we done this, that we have let Israel go from serving us? <text:line-break/><text:span text:style-name="T23">6</text:span> And <text:span text:style-name="T9">he</text:span> made ready <text:span text:style-name="T9">his chariot</text:span>, and took <text:span text:style-name="T9">his</text:span> people <text:span text:style-name="T9">with him</text:span>: <text:line-break/><text:span text:style-name="T23">7</text:span> And <text:span text:style-name="T9">he took</text:span> six hundred chosen chariots, and <text:span text:style-name="T13">all the chariots of Egypt</text:span>, and captains over every one of them. <text:line-break/><text:span text:style-name="T23">8</text:span> And the LORD hardened the heart of <text:span text:style-name="T9">Pharaoh king of Egypt</text:span>, and <text:span text:style-name="T9">he</text:span> pursued after the children of Israel: and the children of Israel went out with an high hand. <text:line-break/><text:span text:style-name="T23">9</text:span> But the Egyptians pursued after them, all the horses <text:span text:style-name="T24">and</text:span> chariots of <text:span text:style-name="T9">Pharaoh</text:span>, and <text:span text:style-name="T9">his</text:span> horsemen, and <text:span text:style-name="T9">his</text:span> army, and overtook them encamping by the sea, beside Pi-hahiroth, before Baal-zephon. <text:line-break/><text:span text:style-name="T23">10</text:span> And when <text:span text:style-name="T9">Pharaoh drew nigh</text:span>, the children of Israel lifted up their eyes, and, behold, the Egyptians marched after them; and they were sore afraid: and the children of Israel cried out unto the LORD. </text:p>
            </table:table-cell>
          </table:table-row>
        </table:table-header-rows>
      </table:table>
      <text:p text:style-name="Standard"/>
      <text:p text:style-name="Standard">In <text:span text:style-name="T30">v</text:span>6,<text:span text:style-name="T31">7,9</text:span><text:span text:style-name="T32"> </text:span>we learn that Pharaoh (also known as the king of Egypt) <text:span text:style-name="T30">and his people are what comprise “the Egyptians” that followed after the children of Israel.</text:span></text:p>
      <text:p text:style-name="Standard"/>
      <text:p text:style-name="Standard">In v10 we learn that Pharaoh came close enough to the children of Israel that they saw him and his army, and <text:span text:style-name="T33">then they </text:span>cried out unto the LORD.</text:p>
      <text:p text:style-name="P10"/>
      <table:table table:name="Table5" table:style-name="Table5">
        <table:table-column table:style-name="Table5.A"/>
        <table:table-row table:style-name="Table5.1">
          <table:table-cell table:style-name="Table5.A1" office:value-type="string">
            <text:p text:style-name="P11"><text:span text:style-name="T16">Exodus 14:17-28</text:span><text:line-break/><text:span text:style-name="T23">17</text:span> And I, behold, I will har<text:span text:style-name="T10">den the hearts of the Egyptians, and they s</text:span>hall follow them: and <text:span text:style-name="T9">I will get me honour upon Pharaoh</text:span>, and upon all <text:span text:style-name="T9">his</text:span> <text:span text:style-name="T10">host</text:span>, upon <text:span text:style-name="T9">his</text:span> <text:span text:style-name="T10">chariots</text:span>, and upon <text:span text:style-name="T9">his</text:span> <text:span text:style-name="T10">horsemen</text:span>. <text:line-break/><text:span text:style-name="T23">18</text:span> And <text:span text:style-name="T26">the Egyptians shall know that I </text:span><text:span text:style-name="T27">am</text:span><text:span text:style-name="T26"> the LORD</text:span>, when <text:span text:style-name="T9">I have gotten me honour upon Pharaoh</text:span>, upon <text:span text:style-name="T9">his</text:span> <text:span text:style-name="T13">chariots</text:span>, and upon <text:span text:style-name="T9">his</text:span> <text:span text:style-name="T25">horsemen</text:span>.<text:line-break/><text:span text:style-name="T23">19</text:span> And the angel of God, which went before the camp of Israel, removed and went behind them; and the pillar of the cloud went from before their face, and stood behind them:<text:line-break/><text:span text:style-name="T23">20</text:span> And it came between the camp of the <text:span text:style-name="T10">Egyptians</text:span> and the camp of Israel; and it was a cloud and darkness <text:span text:style-name="T24">to them</text:span>, but it gave light by night <text:span text:style-name="T24">to these</text:span>: so that the one came not near the other all the night. <text:line-break/><text:span text:style-name="T23">21</text:span> And Moses stretched out his hand over the sea; and the LORD caused the sea to go <text:span text:style-name="T24">back</text:span> by a strong east wind all that night, and made the sea dry <text:span text:style-name="T24">land</text:span>, and the waters were divided.<text:line-break/><text:span text:style-name="T23">22</text:span> And the children of Israel went into the midst of the sea upon the dry <text:span text:style-name="T24">ground</text:span>: and the waters <text:span text:style-name="T24">were</text:span> a wall unto them on their right hand, and on their left.<text:line-break/><text:span text:style-name="T23">23</text:span> And the <text:span text:style-name="T10">Egyptians</text:span> pursued, and went in after them to the midst of the sea, <text:span text:style-name="T24">even</text:span> <text:span text:style-name="T34">all</text:span> <text:span text:style-name="T9">Pharaoh's</text:span> <text:span text:style-name="T10">horses</text:span>, <text:span text:style-name="T9">his</text:span> <text:span text:style-name="T10">chariots</text:span>, and <text:span text:style-name="T9">his</text:span> <text:span text:style-name="T10">horsemen.</text:span><text:line-break/><text:span text:style-name="T23">24</text:span> And it ca<text:span text:style-name="T10">me to pass, that in the morning watch the LORD looked unto the host of the Egyptians through the pillar of fire and of the cloud, and troubled the host of the Egyptians, <text:line-break/></text:span><text:span text:style-name="T35">25</text:span><text:span text:style-name="T10"> And took off their chariot wheels, that they drave them heavily: so that the Egyptians said, Let us flee from the face of Israel; for the LORD fighteth for them against the Egyptians.<text:line-break/></text:span><text:span text:style-name="T35">26</text:span><text:span text:style-name="T10"> And the LORD said unto Moses, Stretch out thine hand over the sea, that the waters may come again upon the Egyptians, upon their chariots, and upon their horsemen.<text:line-break/></text:span><text:span text:style-name="T35">27</text:span><text:span text:style-name="T10"> And Moses stretched forth his hand over t</text:span>he sea, and the sea returned to his strength when the morning appeared; and the Egyptians fled against it; and the LORD overthrew the Egyptians in the midst of the sea. <text:line-break/><text:span text:style-name="T23">28</text:span> And the waters returned, and covered the chariots, and the horsemen, <text:span text:style-name="T24">and</text:span> <text:span text:style-name="T13">all</text:span> the host of Pharaoh that came into the sea after them; <text:span text:style-name="T13">there remained not so much as one of them</text:span>.</text:p>
          </table:table-cell>
        </table:table-row>
      </table:table>
      <text:p text:style-name="Standard"/>
      <text:p text:style-name="P12"><text:span text:style-name="T36">Remember that up until this point the plagues in Egypt had decimated their crops and their livestock. </text:span><text:span text:style-name="T37">After the 7</text:span><text:span text:style-name="T38">th</text:span><text:span text:style-name="T37"> plague </text:span><text:span text:style-name="T39">(thunder, hail, and fire) </text:span><text:span text:style-name="T37">and before the 8</text:span><text:span text:style-name="T38">th</text:span><text:span text:style-name="T37"> plague (locusts) </text:span><text:span text:style-name="T40">even </text:span><text:span text:style-name="T41">Pharaoh’s servants </text:span><text:span text:style-name="T37">admitted that Egypt was “destroyed” </text:span><text:span text:style-name="T42">(</text:span><text:span text:style-name="T16">Exo 10:7</text:span><text:span text:style-name="T42">)</text:span><text:span text:style-name="T37">.</text:span><text:span text:style-name="T41"> </text:span><text:span text:style-name="T43">What’s left </text:span><text:span text:style-name="T44">for God to get honour upon</text:span><text:span text:style-name="T43">? That which hotly pursued after the children of Israel: the leadership and the army.</text:span></text:p>
      <text:p text:style-name="P13"/>
      <text:p text:style-name="P12"><text:span text:style-name="T45">Remember the chariot that Pharaoh made ready </text:span><text:span text:style-name="T46">and led his army </text:span><text:span text:style-name="T47">after the children of Israel </text:span><text:span text:style-name="T48">with </text:span><text:span text:style-name="T45">in </text:span><text:span text:style-name="T16">Exo 14:6</text:span><text:span text:style-name="T45">?</text:span></text:p>
      <text:p text:style-name="P14"/>
      <text:p text:style-name="P15"><text:soft-page-break/>The song of Moses and the children of Israel after the Red sea crossing (Exo 15:1-21)</text:p>
      <text:p text:style-name="P15"/>
      <table:table table:name="Table3" table:style-name="Table3">
        <table:table-column table:style-name="Table3.A"/>
        <table:table-row>
          <table:table-cell table:style-name="Table3.A1" office:value-type="string">
            <text:p text:style-name="P5">Exodus 15:19</text:p>
            <text:p text:style-name="P16">For <text:span text:style-name="T9">the horse of Pharaoh</text:span><text:span text:style-name="T10"> went in </text:span><text:span text:style-name="T9">with</text:span><text:span text:style-name="T10"> </text:span><text:span text:style-name="T13">his chariots</text:span><text:span text:style-name="T10"> and </text:span><text:span text:style-name="T9">with</text:span><text:span text:style-name="T10"> </text:span><text:span text:style-name="T25">his horsemen</text:span><text:span text:style-name="T10"> into the sea,</text:span> and the LORD brought again the waters of the sea upon them; but the children of Israel went on dry land in the midst of the sea.</text:p>
          </table:table-cell>
        </table:table-row>
      </table:table>
      <text:p text:style-name="Standard"/>
      <text:p text:style-name="P17">Where does it say that Pharaoh got off of his chariot and waited on the bank of the Red sea while everyone else went ahead and he survived? <text:span text:style-name="T49">Spoiler: you won’t find it because it didn’t happen.</text:span></text:p>
      <text:p text:style-name="P17"/>
      <text:p text:style-name="P18"><text:span text:style-name="T50">Where else </text:span><text:span text:style-name="T49">in the Bible </text:span><text:span text:style-name="T50">can we find the fulfillment of </text:span><text:span text:style-name="T16">Exodus 9:15</text:span><text:span text:style-name="T50"> concerning Pharaoh?</text:span></text:p>
      <text:p text:style-name="P18"/>
      <text:p text:style-name="P19">And as if that wasn’t enough...</text:p>
      <text:p text:style-name="P19"/>
      <table:table table:name="Table6" table:style-name="Table6">
        <table:table-column table:style-name="Table6.A"/>
        <table:table-row>
          <table:table-cell table:style-name="Table6.A1" office:value-type="string">
            <text:p text:style-name="Table_20_Contents"><text:span text:style-name="T51">Psalms 136:10-15</text:span><text:line-break/><text:span text:style-name="T52">10</text:span> <text:span text:style-name="T53">To him that smote Egypt in their firstborn</text:span>: for his mercy endureth for ever:<text:line-break/><text:span text:style-name="T52">11</text:span> And brought out Israel from among them: for his mercy endureth for ever:<text:line-break/><text:span text:style-name="T52">12</text:span> With a strong hand, and with a stretched out arm: for his mercy endureth for ever.<text:line-break/><text:span text:style-name="T52">13</text:span> To him which divided the Red sea into parts: for his mercy endureth for ever:<text:line-break/><text:span text:style-name="T52">14</text:span> And made Israel to pass through the midst of it: for his mercy endureth for ever:<text:line-break/><text:span text:style-name="T52">15</text:span> But overthrew <text:span text:style-name="T54">Pharaoh and his host</text:span> in the Red sea: for his mercy endureth for ever.</text:p>
          </table:table-cell>
        </table:table-row>
      </table:table>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13:04:49.340599400</meta:creation-date>
    <meta:editing-duration>PT4H49M43S</meta:editing-duration>
    <meta:editing-cycles>91</meta:editing-cycles>
    <meta:generator>LibreOffice/26.2.2.2$Windows_X86_64 LibreOffice_project/1f77d10d6938fd34972958f64b2bcfa54f8b1ba5</meta:generator>
    <dc:title>Did the Pharaoh of the exodus survive the Red sea crossing?</dc:title>
    <dc:date>2026-04-26T13:54:38.646021200</dc:date>
    <meta:print-date>2025-12-09T08:22:59.591969000</meta:print-date>
    <meta:printed-by>PDF files: William K. McDannell Jr.</meta:printed-by>
    <meta:document-statistic meta:table-count="6" meta:image-count="0" meta:object-count="0" meta:page-count="3" meta:paragraph-count="26" meta:word-count="1491" meta:character-count="8000" meta:non-whitespace-character-count="6519"/>
    <meta:template xlink:type="simple" xlink:actuate="onRequest" xlink:title="BibleStudyTemplate" xlink:href="../../../../AppData/Roaming/LibreOffice/4/user/template/BibleStudyTemplate.ott" meta:date="2025-06-23T13:04:49.018481900"/>
  </office:meta>
</office:document-meta>
</file>