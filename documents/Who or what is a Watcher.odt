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700000300F7930B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3.95in" style:rel-width="50%" table:align="center"/>
    </style:style>
    <style:style style:name="Table5.A" style:family="table-column">
      <style:table-column-properties style:column-width="1.975in" style:rel-column-width="2844*"/>
    </style:style>
    <style:style style:name="Table5.A1" style:family="table-cell">
      <style:table-cell-properties fo:padding="0.0382in" fo:border-left="0.75pt solid #000000" fo:border-right="none" fo:border-top="0.75pt solid #000000" fo:border-bottom="0.75pt solid #000000"/>
    </style:style>
    <style:style style:name="Table5.B1" style:family="table-cell">
      <style:table-cell-properties fo:padding="0.0382in" fo:border="0.75pt solid #000000"/>
    </style:style>
    <style:style style:name="Table5.A2" style:family="table-cell">
      <style:table-cell-properties fo:padding="0.0382in" fo:border-left="0.75pt solid #000000" fo:border-right="none" fo:border-top="none" fo:border-bottom="0.75pt solid #000000"/>
    </style:style>
    <style:style style:name="Table5.B2" style:family="table-cell">
      <style:table-cell-properties fo:padding="0.0382in" fo:border-left="0.75pt solid #000000" fo:border-right="0.75pt solid #000000" fo:border-top="none" fo:border-bottom="0.7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5.925in" style:rel-width="75%" table:align="center"/>
    </style:style>
    <style:style style:name="Table7.A" style:family="table-column">
      <style:table-column-properties style:column-width="2.9625in" style:rel-column-width="4209*"/>
    </style:style>
    <style:style style:name="Table7.A1" style:family="table-cell">
      <style:table-cell-properties fo:padding="0.0382in" fo:border-left="0.75pt solid #000000" fo:border-right="none" fo:border-top="0.75pt solid #000000" fo:border-bottom="0.75pt solid #000000"/>
    </style:style>
    <style:style style:name="Table7.B1" style:family="table-cell">
      <style:table-cell-properties fo:padding="0.0382in" fo:border="0.75pt solid #000000"/>
    </style:style>
    <style:style style:name="Table7.A2" style:family="table-cell">
      <style:table-cell-properties fo:padding="0.0382in" fo:border-left="0.75pt solid #000000" fo:border-right="none" fo:border-top="none" fo:border-bottom="0.75pt solid #000000"/>
    </style:style>
    <style:style style:name="Table7.B2" style:family="table-cell">
      <style:table-cell-properties fo:padding="0.0382in" fo:border-left="0.75pt solid #000000" fo:border-right="0.75pt solid #000000" fo:border-top="none" fo:border-bottom="0.75pt solid #000000"/>
    </style:style>
    <style:style style:name="Table9" style:family="table">
      <style:table-properties style:width="6.3194in" style:rel-width="80%" table:align="center"/>
    </style:style>
    <style:style style:name="Table9.A" style:family="table-column">
      <style:table-column-properties style:column-width="6.3194in" style:rel-column-width="9100*"/>
    </style:style>
    <style:style style:name="Table9.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fo:font-size="14pt" officeooo:rsid="001cb52a" officeooo:paragraph-rsid="001cb52a" style:font-size-asian="14pt" style:font-size-complex="14pt"/>
    </style:style>
    <style:style style:name="P2" style:family="paragraph" style:parent-style-name="Standard">
      <style:paragraph-properties fo:text-align="center" style:justify-single-word="false"/>
    </style:style>
    <style:style style:name="P3" style:family="paragraph" style:parent-style-name="Caption">
      <style:text-properties fo:font-size="10pt" style:font-size-asian="10pt" style:font-size-complex="10pt"/>
    </style:style>
    <style:style style:name="P4" style:family="paragraph" style:parent-style-name="Table_20_Contents">
      <style:text-properties fo:color="#127622" loext:opacity="100%"/>
    </style:style>
    <style:style style:name="P5" style:family="paragraph" style:parent-style-name="Standard">
      <style:text-properties officeooo:rsid="0019bbdc" officeooo:paragraph-rsid="0019bbdc"/>
    </style:style>
    <style:style style:name="P6" style:family="paragraph" style:parent-style-name="Standard">
      <style:text-properties officeooo:rsid="00229763" officeooo:paragraph-rsid="00229763"/>
    </style:style>
    <style:style style:name="P7" style:family="paragraph" style:parent-style-name="Standard">
      <style:text-properties officeooo:rsid="002aaf9d" officeooo:paragraph-rsid="002af7a8"/>
    </style:style>
    <style:style style:name="P8" style:family="paragraph" style:parent-style-name="Standard">
      <style:text-properties officeooo:rsid="004dda3d" officeooo:paragraph-rsid="004dda3d"/>
    </style:style>
    <style:style style:name="P9" style:family="paragraph" style:parent-style-name="Standard" style:list-style-name="L1">
      <style:text-properties officeooo:rsid="002af7a8" officeooo:paragraph-rsid="002af7a8"/>
    </style:style>
    <style:style style:name="P10" style:family="paragraph" style:parent-style-name="Standard">
      <style:text-properties officeooo:rsid="002af7a8" officeooo:paragraph-rsid="002af7a8"/>
    </style:style>
    <style:style style:name="P11" style:family="paragraph" style:parent-style-name="Standard">
      <style:text-properties officeooo:rsid="002af7a8" officeooo:paragraph-rsid="002f863b"/>
    </style:style>
    <style:style style:name="P12" style:family="paragraph" style:parent-style-name="Standard">
      <style:text-properties officeooo:rsid="002af7a8" officeooo:paragraph-rsid="00315295"/>
    </style:style>
    <style:style style:name="P13" style:family="paragraph" style:parent-style-name="Standard">
      <style:text-properties officeooo:rsid="00327737" officeooo:paragraph-rsid="00a6250a"/>
    </style:style>
    <style:style style:name="P14" style:family="paragraph" style:parent-style-name="Standard">
      <style:text-properties officeooo:rsid="00327737" officeooo:paragraph-rsid="00327737"/>
    </style:style>
    <style:style style:name="P15" style:family="paragraph" style:parent-style-name="Standard">
      <style:text-properties officeooo:rsid="00a6d060" officeooo:paragraph-rsid="00a6d060"/>
    </style:style>
    <style:style style:name="P16" style:family="paragraph" style:parent-style-name="Standard">
      <style:text-properties officeooo:rsid="0035b599" officeooo:paragraph-rsid="0035b599"/>
    </style:style>
    <style:style style:name="P17" style:family="paragraph" style:parent-style-name="Standard" style:list-style-name="L2">
      <style:text-properties officeooo:rsid="0039bff6" officeooo:paragraph-rsid="0039bff6"/>
    </style:style>
    <style:style style:name="P18" style:family="paragraph" style:parent-style-name="Standard" style:list-style-name="L3">
      <style:text-properties officeooo:paragraph-rsid="0039bff6"/>
    </style:style>
    <style:style style:name="P19" style:family="paragraph" style:parent-style-name="Standard" style:list-style-name="L4">
      <style:text-properties officeooo:rsid="0039bff6" officeooo:paragraph-rsid="0039bff6"/>
    </style:style>
    <style:style style:name="P20" style:family="paragraph" style:parent-style-name="Standard" style:list-style-name="L5">
      <style:text-properties officeooo:paragraph-rsid="0039bff6"/>
    </style:style>
    <style:style style:name="P21" style:family="paragraph" style:parent-style-name="Standard" style:list-style-name="L6">
      <style:text-properties officeooo:rsid="0039bff6" officeooo:paragraph-rsid="0039bff6"/>
    </style:style>
    <style:style style:name="P22" style:family="paragraph" style:parent-style-name="Standard">
      <style:text-properties officeooo:rsid="00a8c2bc" officeooo:paragraph-rsid="00a8c2bc"/>
    </style:style>
    <style:style style:name="P23" style:family="paragraph" style:parent-style-name="Standard">
      <style:text-properties officeooo:rsid="0030cc37" officeooo:paragraph-rsid="00315295"/>
    </style:style>
    <style:style style:name="P24" style:family="paragraph" style:parent-style-name="Standard">
      <style:text-properties officeooo:rsid="00443af2" officeooo:paragraph-rsid="00443af2"/>
    </style:style>
    <style:style style:name="P25" style:family="paragraph" style:parent-style-name="Standard">
      <style:text-properties officeooo:rsid="005bc15e" officeooo:paragraph-rsid="00686822"/>
    </style:style>
    <style:style style:name="P26" style:family="paragraph" style:parent-style-name="Standard">
      <style:text-properties officeooo:rsid="005bc15e" officeooo:paragraph-rsid="00614a38"/>
    </style:style>
    <style:style style:name="P27" style:family="paragraph" style:parent-style-name="Standard">
      <style:text-properties officeooo:rsid="00614a38" officeooo:paragraph-rsid="00614a38"/>
    </style:style>
    <style:style style:name="P28" style:family="paragraph" style:parent-style-name="Standard">
      <style:paragraph-properties fo:text-align="center" style:justify-single-word="false"/>
      <style:text-properties officeooo:rsid="00614a38" officeooo:paragraph-rsid="00614a38"/>
    </style:style>
    <style:style style:name="P29" style:family="paragraph" style:parent-style-name="Standard">
      <style:text-properties officeooo:paragraph-rsid="00640d7f"/>
    </style:style>
    <style:style style:name="P30" style:family="paragraph" style:parent-style-name="Standard">
      <style:text-properties officeooo:rsid="0076b946" officeooo:paragraph-rsid="0076b946"/>
    </style:style>
    <style:style style:name="P31" style:family="paragraph" style:parent-style-name="Table_20_Contents">
      <style:text-properties fo:color="#127622" loext:opacity="100%" officeooo:rsid="007c78ba" officeooo:paragraph-rsid="007c78ba"/>
    </style:style>
    <style:style style:name="P32" style:family="paragraph" style:parent-style-name="Table_20_Contents">
      <style:text-properties officeooo:rsid="007c78ba" officeooo:paragraph-rsid="007c78ba"/>
    </style:style>
    <style:style style:name="P33" style:family="paragraph" style:parent-style-name="Table_20_Contents">
      <style:text-properties fo:color="#127622" loext:opacity="100%" officeooo:rsid="007dafe5" officeooo:paragraph-rsid="007dafe5"/>
    </style:style>
    <style:style style:name="P34" style:family="paragraph" style:parent-style-name="Table_20_Contents">
      <style:text-properties officeooo:rsid="007dafe5" officeooo:paragraph-rsid="007dafe5"/>
    </style:style>
    <style:style style:name="P35" style:family="paragraph" style:parent-style-name="Standard">
      <style:text-properties officeooo:rsid="00aed67c" officeooo:paragraph-rsid="00aed67c"/>
    </style:style>
    <style:style style:name="P36" style:family="paragraph" style:parent-style-name="Standard">
      <style:text-properties officeooo:rsid="0081ca07" officeooo:paragraph-rsid="0081ca07"/>
    </style:style>
    <style:style style:name="P37" style:family="paragraph" style:parent-style-name="Standard">
      <style:text-properties officeooo:rsid="008739a2" officeooo:paragraph-rsid="008739a2"/>
    </style:style>
    <style:style style:name="P38" style:family="paragraph" style:parent-style-name="Standard">
      <style:text-properties officeooo:rsid="008be6fb" officeooo:paragraph-rsid="008be6fb"/>
    </style:style>
    <style:style style:name="P39" style:family="paragraph" style:parent-style-name="Standard">
      <style:text-properties officeooo:rsid="008df846" officeooo:paragraph-rsid="008df846"/>
    </style:style>
    <style:style style:name="P40" style:family="paragraph" style:parent-style-name="Table_20_Contents">
      <style:text-properties officeooo:rsid="008df846" officeooo:paragraph-rsid="008df846"/>
    </style:style>
    <style:style style:name="P41" style:family="paragraph" style:parent-style-name="Table_20_Contents">
      <style:text-properties fo:color="#127622" loext:opacity="100%" officeooo:rsid="008df846" officeooo:paragraph-rsid="008df846"/>
    </style:style>
    <style:style style:name="P42" style:family="paragraph" style:parent-style-name="Table_20_Contents">
      <style:text-properties fo:color="#127622" loext:opacity="100%" officeooo:rsid="008e99ae" officeooo:paragraph-rsid="008e99ae"/>
    </style:style>
    <style:style style:name="P43" style:family="paragraph" style:parent-style-name="Table_20_Contents">
      <style:text-properties officeooo:rsid="008e99ae" officeooo:paragraph-rsid="008e99ae"/>
    </style:style>
    <style:style style:name="P44" style:family="paragraph" style:parent-style-name="Table_20_Contents">
      <style:text-properties officeooo:rsid="008ea85e" officeooo:paragraph-rsid="008ea85e"/>
    </style:style>
    <style:style style:name="P45" style:family="paragraph" style:parent-style-name="Table_20_Contents">
      <style:text-properties fo:color="#127622" loext:opacity="100%" officeooo:rsid="008f6df1" officeooo:paragraph-rsid="008f6df1"/>
    </style:style>
    <style:style style:name="P46" style:family="paragraph" style:parent-style-name="Table_20_Contents">
      <style:text-properties officeooo:rsid="008ff30c" officeooo:paragraph-rsid="008ff30c"/>
    </style:style>
    <style:style style:name="P47" style:family="paragraph" style:parent-style-name="Table_20_Contents">
      <style:text-properties fo:color="#127622" loext:opacity="100%" officeooo:rsid="008ea85e" officeooo:paragraph-rsid="008ea85e"/>
    </style:style>
    <style:style style:name="P48" style:family="paragraph" style:parent-style-name="Table_20_Contents">
      <style:text-properties officeooo:rsid="008f6df1" officeooo:paragraph-rsid="008f6df1"/>
    </style:style>
    <style:style style:name="P49" style:family="paragraph" style:parent-style-name="Standard">
      <style:text-properties officeooo:rsid="00b40f1d" officeooo:paragraph-rsid="008df846"/>
    </style:style>
    <style:style style:name="P50" style:family="paragraph" style:parent-style-name="Standard">
      <style:text-properties officeooo:rsid="00974158" officeooo:paragraph-rsid="00974158"/>
    </style:style>
    <style:style style:name="P51" style:family="paragraph" style:parent-style-name="Table_20_Contents">
      <style:text-properties fo:font-weight="bold" officeooo:rsid="00bbd8d7" officeooo:paragraph-rsid="00bbd8d7" style:font-weight-asian="bold" style:font-weight-complex="bold"/>
    </style:style>
    <style:style style:name="P52" style:family="paragraph" style:parent-style-name="Table_20_Contents">
      <style:text-properties officeooo:rsid="009e64d7" officeooo:paragraph-rsid="009e64d7"/>
    </style:style>
    <style:style style:name="P53" style:family="paragraph" style:parent-style-name="Table_20_Contents">
      <style:text-properties officeooo:rsid="009fc081" officeooo:paragraph-rsid="009fc081"/>
    </style:style>
    <style:style style:name="P54" style:family="paragraph" style:parent-style-name="Standard">
      <style:text-properties officeooo:rsid="00a2b68d" officeooo:paragraph-rsid="00a2b68d"/>
    </style:style>
    <style:style style:name="P55" style:family="paragraph" style:parent-style-name="Standard">
      <style:text-properties officeooo:paragraph-rsid="00c404b6"/>
    </style:style>
    <style:style style:name="T1" style:family="text">
      <style:text-properties style:text-position="super 58%"/>
    </style:style>
    <style:style style:name="T2" style:family="text">
      <style:text-properties fo:color="#127622" loext:opacity="100%"/>
    </style:style>
    <style:style style:name="T3" style:family="text">
      <style:text-properties fo:color="#127622" loext:opacity="100%" officeooo:rsid="00216f6a"/>
    </style:style>
    <style:style style:name="T4" style:family="text">
      <style:text-properties officeooo:rsid="00c46650"/>
    </style:style>
    <style:style style:name="T5" style:family="text">
      <style:text-properties fo:background-color="#fff5ce" loext:char-shading-value="0"/>
    </style:style>
    <style:style style:name="T6" style:family="text">
      <style:text-properties fo:background-color="#dee6ef" loext:char-shading-value="0"/>
    </style:style>
    <style:style style:name="T7" style:family="text">
      <style:text-properties fo:background-color="#ffff00" loext:char-shading-value="0"/>
    </style:style>
    <style:style style:name="T8" style:family="text">
      <style:text-properties officeooo:rsid="00261533"/>
    </style:style>
    <style:style style:name="T9" style:family="text">
      <style:text-properties fo:font-style="italic" officeooo:rsid="00261533" style:font-style-asian="italic" style:font-style-complex="italic"/>
    </style:style>
    <style:style style:name="T10" style:family="text">
      <style:text-properties fo:font-style="italic" officeooo:rsid="00289710" style:font-style-asian="italic" style:font-style-complex="italic"/>
    </style:style>
    <style:style style:name="T11" style:family="text">
      <style:text-properties fo:font-style="italic" style:font-style-asian="italic" style:font-style-complex="italic"/>
    </style:style>
    <style:style style:name="T12" style:family="text">
      <style:text-properties officeooo:rsid="0023fc65"/>
    </style:style>
    <style:style style:name="T13" style:family="text">
      <style:text-properties officeooo:rsid="002949bc"/>
    </style:style>
    <style:style style:name="T14" style:family="text">
      <style:text-properties fo:font-style="italic" officeooo:rsid="002949bc" style:font-style-asian="italic" style:font-style-complex="italic"/>
    </style:style>
    <style:style style:name="T15" style:family="text">
      <style:text-properties officeooo:rsid="00a30720"/>
    </style:style>
    <style:style style:name="T16" style:family="text">
      <style:text-properties fo:font-weight="bold" style:font-weight-asian="bold" style:font-weight-complex="bold"/>
    </style:style>
    <style:style style:name="T17" style:family="text">
      <style:text-properties officeooo:rsid="0045403b"/>
    </style:style>
    <style:style style:name="T18" style:family="text">
      <style:text-properties officeooo:rsid="0045d4b9"/>
    </style:style>
    <style:style style:name="T19" style:family="text">
      <style:text-properties fo:font-style="italic" officeooo:rsid="00474017" style:font-style-asian="italic" style:font-style-complex="italic"/>
    </style:style>
    <style:style style:name="T20" style:family="text">
      <style:text-properties fo:font-style="italic" officeooo:rsid="0045403b" style:font-style-asian="italic" style:font-style-complex="italic"/>
    </style:style>
    <style:style style:name="T21" style:family="text">
      <style:text-properties fo:font-style="italic" officeooo:rsid="0045d4b9" style:font-style-asian="italic" style:font-style-complex="italic"/>
    </style:style>
    <style:style style:name="T22" style:family="text">
      <style:text-properties officeooo:rsid="004830ff"/>
    </style:style>
    <style:style style:name="T23" style:family="text">
      <style:text-properties officeooo:rsid="004b1f99"/>
    </style:style>
    <style:style style:name="T24" style:family="text">
      <style:text-properties officeooo:rsid="0049410a"/>
    </style:style>
    <style:style style:name="T25" style:family="text">
      <style:text-properties fo:font-style="italic" officeooo:rsid="004830ff" style:font-style-asian="italic" style:font-style-complex="italic"/>
    </style:style>
    <style:style style:name="T26" style:family="text">
      <style:text-properties fo:font-weight="bold" officeooo:rsid="004830ff" style:font-weight-asian="bold" style:font-weight-complex="bold"/>
    </style:style>
    <style:style style:name="T27" style:family="text">
      <style:text-properties officeooo:rsid="004c31b7"/>
    </style:style>
    <style:style style:name="T28" style:family="text">
      <style:text-properties officeooo:rsid="00c55c6e"/>
    </style:style>
    <style:style style:name="T29" style:family="text">
      <style:text-properties fo:font-style="italic" officeooo:rsid="004c31b7" style:font-style-asian="italic" style:font-style-complex="italic"/>
    </style:style>
    <style:style style:name="T30" style:family="text">
      <style:text-properties officeooo:rsid="00c79beb"/>
    </style:style>
    <style:style style:name="T31" style:family="text">
      <style:text-properties officeooo:rsid="004dda3d"/>
    </style:style>
    <style:style style:name="T32" style:family="text">
      <style:text-properties officeooo:rsid="004e89e8"/>
    </style:style>
    <style:style style:name="T33" style:family="text">
      <style:text-properties officeooo:rsid="0050f44c"/>
    </style:style>
    <style:style style:name="T34" style:family="text">
      <style:text-properties officeooo:rsid="002c5dff"/>
    </style:style>
    <style:style style:name="T35" style:family="text">
      <style:text-properties fo:color="#127622" loext:opacity="100%" officeooo:rsid="002c5dff"/>
    </style:style>
    <style:style style:name="T36" style:family="text">
      <style:text-properties officeooo:rsid="00a4b564"/>
    </style:style>
    <style:style style:name="T37" style:family="text">
      <style:text-properties officeooo:rsid="00c7a072"/>
    </style:style>
    <style:style style:name="T38" style:family="text">
      <style:text-properties officeooo:rsid="00c7ca3f"/>
    </style:style>
    <style:style style:name="T39" style:family="text">
      <style:text-properties officeooo:rsid="002f863b"/>
    </style:style>
    <style:style style:name="T40" style:family="text">
      <style:text-properties officeooo:rsid="00304292"/>
    </style:style>
    <style:style style:name="T41" style:family="text">
      <style:text-properties officeooo:rsid="00315295"/>
    </style:style>
    <style:style style:name="T42" style:family="text">
      <style:text-properties fo:font-weight="bold" officeooo:rsid="002c5dff" style:font-weight-asian="bold" style:font-weight-complex="bold"/>
    </style:style>
    <style:style style:name="T43" style:family="text">
      <style:text-properties officeooo:rsid="00534dcf"/>
    </style:style>
    <style:style style:name="T44" style:family="text">
      <style:text-properties officeooo:rsid="00a547b3"/>
    </style:style>
    <style:style style:name="T45" style:family="text">
      <style:text-properties officeooo:rsid="00526f13"/>
    </style:style>
    <style:style style:name="T46" style:family="text">
      <style:text-properties officeooo:rsid="0057ff77"/>
    </style:style>
    <style:style style:name="T47" style:family="text">
      <style:text-properties fo:font-weight="bold" officeooo:rsid="00315295" style:font-weight-asian="bold" style:font-weight-complex="bold"/>
    </style:style>
    <style:style style:name="T48" style:family="text">
      <style:text-properties officeooo:rsid="0033a7cf"/>
    </style:style>
    <style:style style:name="T49" style:family="text">
      <style:text-properties officeooo:rsid="00a6250a"/>
    </style:style>
    <style:style style:name="T50" style:family="text">
      <style:text-properties officeooo:rsid="00a857fd"/>
    </style:style>
    <style:style style:name="T51" style:family="text">
      <style:text-properties fo:font-weight="bold" officeooo:rsid="00cc524c" style:font-weight-asian="bold" style:font-weight-complex="bold"/>
    </style:style>
    <style:style style:name="T52" style:family="text">
      <style:text-properties officeooo:rsid="00cc524c"/>
    </style:style>
    <style:style style:name="T53" style:family="text">
      <style:text-properties officeooo:rsid="003e0a61"/>
    </style:style>
    <style:style style:name="T54" style:family="text">
      <style:text-properties officeooo:rsid="0039bff6"/>
    </style:style>
    <style:style style:name="T55" style:family="text">
      <style:text-properties officeooo:rsid="003ebef1"/>
    </style:style>
    <style:style style:name="T56" style:family="text">
      <style:text-properties officeooo:rsid="00cee2e0"/>
    </style:style>
    <style:style style:name="T57" style:family="text">
      <style:text-properties officeooo:rsid="0041959b"/>
    </style:style>
    <style:style style:name="T58" style:family="text">
      <style:text-properties officeooo:rsid="0041a6f0"/>
    </style:style>
    <style:style style:name="T59" style:family="text">
      <style:text-properties officeooo:rsid="003529d3"/>
    </style:style>
    <style:style style:name="T60" style:family="text">
      <style:text-properties officeooo:rsid="0035b599"/>
    </style:style>
    <style:style style:name="T61" style:family="text">
      <style:text-properties fo:font-style="italic" officeooo:rsid="0035b599" style:font-style-asian="italic" style:font-style-complex="italic"/>
    </style:style>
    <style:style style:name="T62" style:family="text">
      <style:text-properties fo:color="#127622" loext:opacity="100%" officeooo:rsid="0035b599"/>
    </style:style>
    <style:style style:name="T63" style:family="text">
      <style:text-properties officeooo:rsid="00442dd8"/>
    </style:style>
    <style:style style:name="T64" style:family="text">
      <style:text-properties fo:font-style="italic" officeooo:rsid="00442dd8" style:font-style-asian="italic" style:font-style-complex="italic"/>
    </style:style>
    <style:style style:name="T65" style:family="text">
      <style:text-properties fo:color="#127622" loext:opacity="100%" officeooo:rsid="00442dd8"/>
    </style:style>
    <style:style style:name="T66" style:family="text">
      <style:text-properties officeooo:rsid="00422585"/>
    </style:style>
    <style:style style:name="T67" style:family="text">
      <style:text-properties fo:font-weight="bold" officeooo:rsid="00422585" style:font-weight-asian="bold" style:font-weight-complex="bold"/>
    </style:style>
    <style:style style:name="T68" style:family="text">
      <style:text-properties officeooo:rsid="005f9009"/>
    </style:style>
    <style:style style:name="T69" style:family="text">
      <style:text-properties officeooo:rsid="00614a38"/>
    </style:style>
    <style:style style:name="T70" style:family="text">
      <style:text-properties officeooo:rsid="0060a54e"/>
    </style:style>
    <style:style style:name="T71" style:family="text">
      <style:text-properties officeooo:rsid="0062b8c7"/>
    </style:style>
    <style:style style:name="T72" style:family="text">
      <style:text-properties officeooo:rsid="00686822"/>
    </style:style>
    <style:style style:name="T73" style:family="text">
      <style:text-properties officeooo:rsid="00659534"/>
    </style:style>
    <style:style style:name="T74" style:family="text">
      <style:text-properties fo:font-weight="bold" officeooo:rsid="00659534" style:font-weight-asian="bold" style:font-weight-complex="bold"/>
    </style:style>
    <style:style style:name="T75" style:family="text">
      <style:text-properties officeooo:rsid="0066f58b"/>
    </style:style>
    <style:style style:name="T76" style:family="text">
      <style:text-properties officeooo:rsid="006aed3a"/>
    </style:style>
    <style:style style:name="T77" style:family="text">
      <style:text-properties officeooo:rsid="0072e448"/>
    </style:style>
    <style:style style:name="T78" style:family="text">
      <style:text-properties officeooo:rsid="00ac1f4a"/>
    </style:style>
    <style:style style:name="T79" style:family="text">
      <style:text-properties officeooo:rsid="00688fab"/>
    </style:style>
    <style:style style:name="T80" style:family="text">
      <style:text-properties officeooo:rsid="006c92fa"/>
    </style:style>
    <style:style style:name="T81" style:family="text">
      <style:text-properties officeooo:rsid="00640d7f"/>
    </style:style>
    <style:style style:name="T82" style:family="text">
      <style:text-properties fo:font-style="italic" officeooo:rsid="00640d7f" style:font-style-asian="italic" style:font-style-complex="italic"/>
    </style:style>
    <style:style style:name="T83" style:family="text">
      <style:text-properties officeooo:rsid="005bc15e"/>
    </style:style>
    <style:style style:name="T84" style:family="text">
      <style:text-properties officeooo:rsid="0064be92"/>
    </style:style>
    <style:style style:name="T85" style:family="text">
      <style:text-properties fo:font-weight="bold" officeooo:rsid="00640d7f" style:font-weight-asian="bold" style:font-weight-complex="bold"/>
    </style:style>
    <style:style style:name="T86" style:family="text">
      <style:text-properties officeooo:rsid="0076b946"/>
    </style:style>
    <style:style style:name="T87" style:family="text">
      <style:text-properties fo:font-style="italic" officeooo:rsid="0076b946" style:font-style-asian="italic" style:font-style-complex="italic"/>
    </style:style>
    <style:style style:name="T88" style:family="text">
      <style:text-properties officeooo:rsid="007adbfd"/>
    </style:style>
    <style:style style:name="T89" style:family="text">
      <style:text-properties officeooo:rsid="00af5ab0"/>
    </style:style>
    <style:style style:name="T90" style:family="text">
      <style:text-properties officeooo:rsid="00775b13"/>
    </style:style>
    <style:style style:name="T91" style:family="text">
      <style:text-properties officeooo:rsid="007dc977"/>
    </style:style>
    <style:style style:name="T92" style:family="text">
      <style:text-properties fo:font-style="italic" officeooo:rsid="007c7819" style:font-style-asian="italic" style:font-style-complex="italic"/>
    </style:style>
    <style:style style:name="T93" style:family="text">
      <style:text-properties officeooo:rsid="007c7819"/>
    </style:style>
    <style:style style:name="T94" style:family="text">
      <style:text-properties officeooo:rsid="00803824"/>
    </style:style>
    <style:style style:name="T95" style:family="text">
      <style:text-properties fo:color="#127622" loext:opacity="100%" officeooo:rsid="00803824"/>
    </style:style>
    <style:style style:name="T96" style:family="text">
      <style:text-properties officeooo:rsid="007c78ba"/>
    </style:style>
    <style:style style:name="T97" style:family="text">
      <style:text-properties fo:color="#3465a4" loext:opacity="100%"/>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officeooo:rsid="00d13ccc"/>
    </style:style>
    <style:style style:name="T100" style:family="text">
      <style:text-properties officeooo:rsid="00828511"/>
    </style:style>
    <style:style style:name="T101" style:family="text">
      <style:text-properties fo:color="#127622" loext:opacity="100%" officeooo:rsid="00828511"/>
    </style:style>
    <style:style style:name="T102" style:family="text">
      <style:text-properties fo:color="#127622" loext:opacity="100%" officeooo:rsid="0084826f"/>
    </style:style>
    <style:style style:name="T103" style:family="text">
      <style:text-properties officeooo:rsid="0084826f"/>
    </style:style>
    <style:style style:name="T104" style:family="text">
      <style:text-properties fo:color="#127622" loext:opacity="100%" officeooo:rsid="0085d1d5"/>
    </style:style>
    <style:style style:name="T105" style:family="text">
      <style:text-properties officeooo:rsid="0085d1d5"/>
    </style:style>
    <style:style style:name="T106" style:family="text">
      <style:text-properties fo:font-size="10pt" officeooo:rsid="0085d1d5" style:font-size-asian="10pt" style:font-size-complex="10pt"/>
    </style:style>
    <style:style style:name="T107" style:family="text">
      <style:text-properties fo:font-size="10pt" officeooo:rsid="008681c8" style:font-size-asian="10pt" style:font-size-complex="10pt"/>
    </style:style>
    <style:style style:name="T108" style:family="text">
      <style:text-properties officeooo:rsid="008df846"/>
    </style:style>
    <style:style style:name="T109" style:family="text">
      <style:text-properties fo:color="#127622" loext:opacity="100%" officeooo:rsid="008df846"/>
    </style:style>
    <style:style style:name="T110" style:family="text">
      <style:text-properties officeooo:rsid="008ea85e"/>
    </style:style>
    <style:style style:name="T111" style:family="text">
      <style:text-properties officeooo:rsid="0095ac8d"/>
    </style:style>
    <style:style style:name="T112" style:family="text">
      <style:text-properties officeooo:rsid="008f6df1"/>
    </style:style>
    <style:style style:name="T113" style:family="text">
      <style:text-properties officeooo:rsid="00b882e3"/>
    </style:style>
    <style:style style:name="T114" style:family="text">
      <style:text-properties officeooo:rsid="00baa0d9"/>
    </style:style>
    <style:style style:name="T115" style:family="text">
      <style:text-properties fo:font-style="italic" officeooo:rsid="00b882e3" style:font-style-asian="italic" style:font-style-complex="italic"/>
    </style:style>
    <style:style style:name="T116" style:family="text">
      <style:text-properties officeooo:rsid="00997a69"/>
    </style:style>
    <style:style style:name="T117" style:family="text">
      <style:text-properties officeooo:rsid="00a2b68d"/>
    </style:style>
    <style:style style:name="T118" style:family="text">
      <style:text-properties fo:font-style="italic" officeooo:rsid="00a2b68d" style:font-style-asian="italic" style:font-style-complex="italic"/>
    </style:style>
    <style:style style:name="T119" style:family="text">
      <style:text-properties officeooo:rsid="00d2523d"/>
    </style:style>
    <style:style style:name="T120" style:family="text">
      <style:text-properties officeooo:rsid="00c0b904"/>
    </style:style>
    <style:style style:name="T121" style:family="text">
      <style:text-properties officeooo:rsid="00c436d3"/>
    </style:style>
    <style:style style:name="T122" style:family="text">
      <style:text-properties fo:color="#127622" loext:opacity="100%" officeooo:rsid="00c436d3"/>
    </style:style>
    <style:style style:name="T123" style:family="text">
      <style:text-properties officeooo:rsid="00c28713"/>
    </style:style>
    <style:style style:name="T124" style:family="text">
      <style:text-properties fo:color="#127622" loext:opacity="100%" officeooo:rsid="00c2871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 or what is a watcher?</text:p>
      <text:p text:style-name="Standard"/>
      <text:p text:style-name="P2"><draw:frame draw:style-name="fr1" draw:name="Frame1" text:anchor-type="as-char" svg:width="6.5602in" draw:z-index="0"><draw:text-box fo:min-height="5.3882in"><text:p text:style-name="P3"><draw:frame draw:style-name="fr2" draw:name="Image1" text:anchor-type="paragraph" svg:width="6.3638in" style:rel-width="97%" svg:height="5.2264in" style:rel-height="scale" draw:z-index="1"><draw:image xlink:href="Pictures/10000001000003A700000300F7930B7F.png" xlink:type="simple" xlink:show="embed" xlink:actuate="onLoad" draw:mime-type="image/png"/></draw:frame>Nebuchadnezzar recounts his dream to Daniel for interpretation.</text:p></draw:text-box></draw:frame></text:p>
      <text:p text:style-name="Standard"/>
      <table:table table:name="Table2" table:style-name="Table2">
        <table:table-column table:style-name="Table2.A"/>
        <table:table-row>
          <table:table-cell table:style-name="Table2.A1" office:value-type="string">
            <text:p text:style-name="P4">Daniel 4:10-12</text:p>
            <text:p text:style-name="Table_20_Contents"><text:span text:style-name="T1">10</text:span> Thus were the visions of mine head in my bed; I saw, and behold a tree in the midst of the earth, and the height thereof was great.</text:p>
            <text:p text:style-name="Table_20_Contents"><text:span text:style-name="T1">11</text:span> The tree grew, and was strong, and the height thereof reached unto heaven, and the sight thereof to the end of all the earth:</text:p>
            <text:p text:style-name="Table_20_Contents"><text:span text:style-name="T1">12</text:span> The leaves thereof were fair, and the fruit thereof much, and in it was meat for all: the beasts of the field had shadow under it, and the fowls of the heaven dwelt in the boughs thereof, and all flesh was fed of it.</text:p>
          </table:table-cell>
        </table:table-row>
      </table:table>
      <text:p text:style-name="Standard"/>
      <text:p text:style-name="P5">In <text:span text:style-name="T2">Daniel 4:</text:span><text:span text:style-name="T3">10-17</text:span> when Nebuchadnezzar is recounting his dream to Daniel <text:span text:style-name="T4">he uses some interesting language that we can learn a great deal from.</text:span></text:p>
      <text:p text:style-name="Standard"/>
      <table:table table:name="Table1" table:style-name="Table1">
        <table:table-column table:style-name="Table1.A"/>
        <table:table-row>
          <table:table-cell table:style-name="Table1.A1" office:value-type="string">
            <text:p text:style-name="P4">Daniel 4:13</text:p>
            <text:p text:style-name="Table_20_Contents">I saw in the visions of my head upon my bed, and, behold, <text:span text:style-name="T5">a</text:span> <text:span text:style-name="T6">watcher</text:span> <text:span text:style-name="T7">and</text:span> <text:span text:style-name="T5">an</text:span> <text:span text:style-name="T6">holy one</text:span> came down from heaven;</text:p>
          </table:table-cell>
        </table:table-row>
      </table:table>
      <text:p text:style-name="Standard"/>
      <text:p text:style-name="P6">At first glance, because <text:span text:style-name="T8">both nouns (“</text:span><text:span text:style-name="T9">watch</text:span><text:span text:style-name="T10">er</text:span><text:span text:style-name="T8">” &amp; “</text:span><text:span text:style-name="T9">holy one</text:span><text:span text:style-name="T8">”) have their own determiner (“</text:span><text:span text:style-name="T9">a</text:span><text:span text:style-name="T8">” &amp; “</text:span><text:span text:style-name="T9">an</text:span><text:span text:style-name="T8">”) combined with the co</text:span>njunction “<text:span text:style-name="T11">and</text:span>” it appears that two different entities appeared in Nebuchadnezzar’s dream. <text:span text:style-name="T12">And under normal English grammatical rules this would be the correct interpretation. </text:span><text:span text:style-name="T13">If one of those nouns lacked a determiner (eg. “</text:span><text:span text:style-name="T14">a watcher and holy one</text:span><text:span text:style-name="T13">” or “</text:span><text:span text:style-name="T14">a great and might warrior</text:span><text:span text:style-name="T13">”) the interpretation would be that they are two words describing the same entity. Because of this, it might be </text:span><text:span text:style-name="T15">very </text:span><text:span text:style-name="T13">easy to miss a</text:span><text:span text:style-name="T15">n important </text:span><text:span text:style-name="T13">detail in the context </text:span><text:span text:style-name="T15">that follows this verse</text:span><text:span text:style-name="T13">.</text:span></text:p>
      <table:table table:name="Table3" table:style-name="Table3">
        <table:table-column table:style-name="Table3.A"/>
        <text:soft-page-break/>
        <table:table-row>
          <table:table-cell table:style-name="Table3.A1" office:value-type="string">
            <text:p text:style-name="P4">Daniel 4:13-16</text:p>
            <text:p text:style-name="Table_20_Contents"><text:span text:style-name="T1">13</text:span> I saw in the visions of my head upon my bed, and, behold, <text:span text:style-name="T5">a watcher and an holy one</text:span> came down from heaven;</text:p>
            <text:p text:style-name="Table_20_Contents"><text:span text:style-name="T1">14</text:span> <text:span text:style-name="T7">He cried aloud</text:span>, and said thus, Hew down the tree, and cut off his branches, shake off his leaves, and scatter his fruit: let the beasts get away from under it, and the fowls from his branches:</text:p>
            <text:p text:style-name="Table_20_Contents"><text:span text:style-name="T1">15</text:span> Nevertheless leave the stump of his roots in the earth, even with a band of iron and brass, in the tender grass of the field; and let it be wet with the dew of heaven, and let his portion be with the beasts in the grass of the earth:</text:p>
            <text:p text:style-name="Table_20_Contents"><text:span text:style-name="T1">16</text:span> Let his heart be changed from man's, and let a beast's heart be given unto him; and let seven times pass over him.</text:p>
          </table:table-cell>
        </table:table-row>
      </table:table>
      <text:p text:style-name="P6"/>
      <text:p text:style-name="P7">Verse 14 begins with the <text:span text:style-name="T16">singular</text:span> pronoun “<text:span text:style-name="T11">He</text:span>” and that is what <text:span text:style-name="T17">should catch our </text:span>attention. <text:span text:style-name="T17">The last noun that that pronoun refers </text:span><text:span text:style-name="T18">back</text:span><text:span text:style-name="T17"> to is “</text:span><text:span text:style-name="T19">an </text:span><text:span text:style-name="T20">holy one</text:span><text:span text:style-name="T17">”. </text:span><text:span text:style-name="T18">But wait, the previous sentence uses the conjunction “</text:span><text:span text:style-name="T21">and</text:span><text:span text:style-name="T18">” with “</text:span><text:span text:style-name="T21">holy one</text:span><text:span text:style-name="T18">” which </text:span><text:span text:style-name="T22">joins the two nouns together as one. </text:span><text:span text:style-name="T23">Thus</text:span><text:span text:style-name="T22">, </text:span><text:span text:style-name="T24">together with the context</text:span><text:span text:style-name="T22"> the “</text:span><text:span text:style-name="T25">he</text:span><text:span text:style-name="T22">” is the same as </text:span><text:span text:style-name="T26">both</text:span><text:span text:style-name="T22"> “</text:span><text:span text:style-name="T25">a watcher and an holy one</text:span><text:span text:style-name="T22">”. </text:span><text:span text:style-name="T27">This literary figure of speech </text:span><text:span text:style-name="T28">is a real thing and it has </text:span><text:span text:style-name="T27">a fancy name: it’s called a “</text:span><text:span text:style-name="T29">hendiadys</text:span><text:span text:style-name="T27">” (hen-dia-dis). The term comes from the Greek </text:span><text:span text:style-name="T29">hen dia duoin</text:span><text:span text:style-name="T27">, which literally means "one through two". </text:span><text:span text:style-name="T30">As it turns out, w</text:span><text:span text:style-name="T31">e use these all the time in modern speech.</text:span></text:p>
      <text:p text:style-name="P8"/>
      <text:p text:style-name="P8">Example English hendiadys:</text:p>
      <text:p text:style-name="P8"/>
      <text:list text:style-name="L1">
        <text:list-item>
          <text:p text:style-name="P9">“<text:span text:style-name="T31">Nice and warm” instead of “nicely warm”.</text:span></text:p>
        </text:list-item>
        <text:list-item>
          <text:p text:style-name="P9">“<text:span text:style-name="T31">Good and ready” instead of “completely ready”.</text:span></text:p>
        </text:list-item>
        <text:list-item>
          <text:p text:style-name="P9">“<text:span text:style-name="T31">Sick and tired” instead of “exceedingly tired” or “weary”.</text:span></text:p>
        </text:list-item>
        <text:list-item>
          <text:p text:style-name="P9">“<text:span text:style-name="T32">brimstone and fire” instead of “burning sulfur”.</text:span></text:p>
        </text:list-item>
      </text:list>
      <text:p text:style-name="P10"/>
      <text:p text:style-name="P11">Before we continue though, there is one <text:span text:style-name="T33">more </text:span>small detail that we need to understand. From <text:span text:style-name="T2">Daniel 2:4b</text:span> to <text:span text:style-name="T2">Daniel 7:28</text:span> was written in “<text:span text:style-name="T11">Syriack</text:span>” and not Hebrew like most of the old testament <text:span text:style-name="T34">(</text:span><text:span text:style-name="T35">Ezra 4:8-6:18</text:span><text:span text:style-name="T34">, </text:span><text:span text:style-name="T35">7:12-26</text:span><text:span text:style-name="T34">, </text:span><text:span text:style-name="T35">Jeremiah 10:11</text:span><text:span text:style-name="T34"> are also written in </text:span><text:span text:style-name="T36">some form of what we </text:span><text:span text:style-name="T37">would </text:span><text:span text:style-name="T36">call “</text:span><text:span text:style-name="T34">Aramaic”)</text:span>. The word behind <text:span text:style-name="T11">Syriack</text:span> is ארמית / 'ărāmy which <text:span text:style-name="T38">when</text:span> translated means “the language of Aram” <text:span text:style-name="T39">(the region known as Syria and Mesopotamia)</text:span>. In modern times we refer to this language as <text:span text:style-name="T11">Chaldee</text:span> / <text:span text:style-name="T11">Chaldaic</text:span> / <text:span text:style-name="T11">Chaldean</text:span> or <text:span text:style-name="T11">Aramaic</text:span>. <text:span text:style-name="T34">So, why is that important? </text:span><text:span text:style-name="T40">Because j</text:span><text:span text:style-name="T34">ust like Hebrew and Greek, Aramaic is a highly inflected language. In </text:span><text:span text:style-name="T41">highly </text:span><text:span text:style-name="T34">inflected </text:span><text:span text:style-name="T41">languages each word of a sentence is modified to</text:span><text:span text:style-name="T34"> convey tense, gender, </text:span><text:span text:style-name="T42">number</text:span><text:span text:style-name="T34">, and case </text:span><text:span text:style-name="T43">and </text:span><text:span text:style-name="T44">it also </text:span><text:span text:style-name="T43">must</text:span><text:span text:style-name="T45"> </text:span><text:span text:style-name="T44">grammatically </text:span><text:span text:style-name="T45">agree with the subject</text:span><text:span text:style-name="T34">. </text:span><text:span text:style-name="T44">To form </text:span><text:span text:style-name="T41">proper </text:span><text:span text:style-name="T46">sentence</text:span><text:span text:style-name="T41"> in those languages the tense, gender, </text:span><text:span text:style-name="T47">number</text:span><text:span text:style-name="T41">, and case of </text:span><text:span text:style-name="T47">every</text:span><text:span text:style-name="T41"> </text:span><text:span text:style-name="T47">word</text:span><text:span text:style-name="T41"> in the sentence must agree.</text:span></text:p>
      <text:p text:style-name="P12"/>
      <text:p text:style-name="P13">For example, in Hebrew, if a sentence has two subjects performing an action, the verb takes on a unique plural form to agree with the plurality of those subjects. <text:span text:style-name="T48">If there were only one subject, the same verb would be spelled differently. </text:span><text:span text:style-name="T49">English is very different (weakly inflected) as we can see in the examples of “I ran.”, “He ran.”, and “We ran.” – they all use the exact same verb form “ran” </text:span><text:span text:style-name="T50">even when the subject </text:span><text:span text:style-name="T51">number</text:span><text:span text:style-name="T52"> (plurality)</text:span><text:span text:style-name="T50"> changes.</text:span></text:p>
      <text:p text:style-name="P14"/>
      <text:p text:style-name="P15">English was not always weakly inflected and has changed in four major stages over time:</text:p>
      <text:p text:style-name="P16"/>
      <text:list xml:id="list4150190002" text:style-name="L2">
        <text:list-item>
          <text:p text:style-name="P17"><text:span text:style-name="T16">Old English</text:span> (450-1150AD)</text:p>
        </text:list-item>
      </text:list>
      <text:list text:style-name="L3">
        <text:list-item>
          <text:list>
            <text:list-item>
              <text:p text:style-name="P18"><text:span text:style-name="T53">H</text:span><text:span text:style-name="T54">ighly inflected, </text:span><text:span text:style-name="T53">not recognizable as English </text:span><text:span text:style-name="T55">to a modern reader</text:span><text:span text:style-name="T53"> (eg. “Our Father which art in heaven” is written as “Fæder ūser, þū þe eart on heofonum”).</text:span></text:p>
            </text:list-item>
          </text:list>
        </text:list-item>
      </text:list>
      <text:list xml:id="list123045360578335" text:continue-list="list4150190002" text:style-name="L2">
        <text:list-item>
          <text:p text:style-name="P17"><text:span text:style-name="T16">Middle English</text:span> (1150-1500AD)</text:p>
        </text:list-item>
      </text:list>
      <text:list text:style-name="L4">
        <text:list-item>
          <text:list>
            <text:list-item>
              <text:p text:style-name="P19">Inflections dissolve and thousands of French words enter the language.</text:p>
            </text:list-item>
          </text:list>
        </text:list-item>
      </text:list>
      <text:list xml:id="list123046125561126" text:continue-list="list123045360578335" text:style-name="L2">
        <text:list-item>
          <text:p text:style-name="P17"><text:span text:style-name="T16">Early Modern English</text:span> (1500-1700AD)</text:p>
        </text:list-item>
      </text:list>
      <text:list text:style-name="L5">
        <text:list-item>
          <text:list>
            <text:list-item>
              <text:p text:style-name="P20"><text:span text:style-name="T54">Pronunciation shifted wildly and the printing press standardized spelling. The KJ</text:span><text:span text:style-name="T56">B</text:span><text:span text:style-name="T54"> (known then only as “The Holy Bible”) and William Shakespeare’s writings use this </text:span><text:span text:style-name="T57">form</text:span><text:span text:style-name="T54"> of the language.</text:span></text:p>
            </text:list-item>
          </text:list>
        </text:list-item>
      </text:list>
      <text:list text:continue-list="list123046125561126" text:style-name="L2">
        <text:list-item>
          <text:p text:style-name="P17"><text:span text:style-name="T16">Modern English</text:span> (1700AD-Present)</text:p>
        </text:list-item>
      </text:list>
      <text:list text:style-name="L6">
        <text:list-item>
          <text:list>
            <text:list-item>
              <text:p text:style-name="P21">The globally spoken, weakly inflected language we use today.</text:p>
            </text:list-item>
          </text:list>
        </text:list-item>
      </text:list>
      <text:p text:style-name="P22"><text:soft-page-break/>Now, b<text:span text:style-name="T58">ecause Aramaic is a highly inflected language</text:span><text:span text:style-name="T59"> we can take advantage of </text:span><text:span text:style-name="T58">that</text:span><text:span text:style-name="T59"> and look at the </text:span><text:span text:style-name="T60">verbs, </text:span><text:span text:style-name="T58">for example, </text:span><text:span text:style-name="T60">to further confirm that the </text:span><text:span text:style-name="T61">watcher</text:span><text:span text:style-name="T60"> and </text:span><text:span text:style-name="T61">holy one</text:span><text:span text:style-name="T60"> in </text:span><text:span text:style-name="T62">Daniel 4:13</text:span><text:span text:style-name="T60"> are </text:span><text:span text:style-name="T58">indeed </text:span><text:span text:style-name="T60">both the same entity - </text:span><text:span text:style-name="T63">exactly as the singular pronoun “</text:span><text:span text:style-name="T64">He</text:span><text:span text:style-name="T63">” in </text:span><text:span text:style-name="T65">Daniel 4:14</text:span><text:span text:style-name="T63"> implies </text:span><text:span text:style-name="T66">(because in proper Aramaic grammar the verbs </text:span><text:span text:style-name="T67">must</text:span><text:span text:style-name="T66"> agree in tense, gender, </text:span><text:span text:style-name="T67">number</text:span><text:span text:style-name="T66">, and case with the </text:span><text:span text:style-name="T68">subject</text:span><text:span text:style-name="T66">).</text:span></text:p>
      <text:p text:style-name="P23"/>
      <text:p text:style-name="P24">Later on in the chapter Daniel is interpreting Nebuchadnezzar’s dream to him and he refers to the watcher in the following way:</text:p>
      <text:p text:style-name="P24"/>
      <table:table table:name="Table4" table:style-name="Table4">
        <table:table-column table:style-name="Table4.A"/>
        <table:table-row>
          <table:table-cell table:style-name="Table4.A1" office:value-type="string">
            <text:p text:style-name="P4">Daniel 4:23</text:p>
            <text:p text:style-name="Table_20_Contents">And whereas the king saw <text:span text:style-name="T5">a watcher and an holy one</text:span> coming down from heaven, and <text:span text:style-name="T7">saying</text:span>, Hew the tree down, and destroy it; yet leave the stump of the roots thereof in the earth, even with a band of iron and brass, in the tender grass of the field; and let it be wet with the dew of heaven, and let his portion be with the beasts of the field, till seven times pass over him;</text:p>
          </table:table-cell>
        </table:table-row>
      </table:table>
      <text:p text:style-name="P23"/>
      <text:p text:style-name="P25">The verb “<text:span text:style-name="T11">saying</text:span>” in <text:span text:style-name="T2">Daniel 4:23</text:span> is <text:span text:style-name="T69">classified by Strongs as </text:span><text:span text:style-name="T70">H560 </text:span>אֲמַר / 'ămar <text:span text:style-name="T71">and the dictionary form just so happens to match the exact form used in the Masoretic Text. </text:span><text:span text:style-name="T72">If you weren’t already aware, t</text:span><text:span text:style-name="T73">he dictionary form more often than not </text:span><text:span text:style-name="T74">does not</text:span><text:span text:style-name="T73"> match the exact form used in the text</text:span><text:span text:style-name="T75">. For an in depth study on that topic see the article at the following URL: </text:span><text:a xlink:type="simple" xlink:href="https://cheerful-wmcdannell.wordpress.com/2026/02/17/the-dangers-of-relying-on-strongs-concordance-for-hebrew-greek-studies/" text:style-name="Internet_20_link" text:visited-style-name="Visited_20_Internet_20_Link"><text:span text:style-name="T75">https://cheerful-wmcdannell.wordpress.com/2026/02/17/the-dangers-of-relying-on-strongs-concordance-for-hebrew-greek-studies/</text:span></text:a><text:span text:style-name="T72">.</text:span></text:p>
      <text:p text:style-name="P26"/>
      <text:p text:style-name="P27">The actual word<text:span text:style-name="T76">s</text:span> used in the 1524 Bomberg MT <text:span text:style-name="T77">are</text:span>:</text:p>
      <text:p text:style-name="P27"/>
      <text:p text:style-name="P28">“coming down from heaven, and saying”<text:line-break/>נָחִת מִן־שְׁמַיָּא וְאָמַר</text:p>
      <text:p text:style-name="P26"/>
      <text:p text:style-name="P27">Remember that <text:span text:style-name="T78">Hebrew “square script” (Ktav Ashuri) / </text:span>Aramaic is a RTL (right-to-left) language and so the “word” we are looking for is:</text:p>
      <text:p text:style-name="P27"/>
      <text:p text:style-name="P28">“<text:span text:style-name="T79">and </text:span>saying”</text:p>
      <text:p text:style-name="P28">וְאָמַר</text:p>
      <text:p text:style-name="P26"/>
      <text:p text:style-name="P29"><text:span text:style-name="T80">T</text:span><text:span text:style-name="T81">he prefix </text:span><text:span text:style-name="T69">וְ </text:span><text:span text:style-name="T81">is what is called a </text:span><text:span text:style-name="T82">proclitic particle</text:span><text:span text:style-name="T81"> and it represents the English word “and”. If we strip away the “</text:span><text:span text:style-name="T82">and</text:span><text:span text:style-name="T81">” we are left with </text:span><text:span text:style-name="T83">אֲמַר </text:span><text:span text:style-name="T81">which, as you can </text:span><text:span text:style-name="T84">easily see</text:span><text:span text:style-name="T81">, is the exact same </text:span><text:span text:style-name="T85">singular</text:span><text:span text:style-name="T81"> masculine participle. </text:span><text:span text:style-name="T86">Now that we’ve firmly established a relationship between a “</text:span><text:span text:style-name="T87">watcher</text:span><text:span text:style-name="T86">” and some other noun </text:span><text:span text:style-name="T88">(</text:span><text:span text:style-name="T86">“</text:span><text:span text:style-name="T87">holy one</text:span><text:span text:style-name="T86">”</text:span><text:span text:style-name="T88">)</text:span><text:span text:style-name="T86"> we can then use that to define what exactly is a watcher </text:span><text:span text:style-name="T89">in addition to</text:span><text:span text:style-name="T90"> what the name </text:span><text:span text:style-name="T91">itself </text:span><text:span text:style-name="T90">implies.</text:span></text:p>
      <text:p text:style-name="P30"/>
      <text:p text:style-name="P30">“<text:span text:style-name="T92">holy one</text:span><text:span text:style-name="T93">” </text:span><text:span text:style-name="T94">(</text:span><text:span text:style-name="T95">Daniel 4:13,17,23</text:span><text:span text:style-name="T94">) </text:span><text:span text:style-name="T93">is classified by Strongs as H6922 which of course is an Aramaic word but it corresponds to the Hebrew H6918. </text:span><text:span text:style-name="T96">H6922 is very telling on it’s own in that it shows up in the following verses as the following English words:</text:span></text:p>
      <text:p text:style-name="P30"/>
      <table:table table:name="Table5" table:style-name="Table5">
        <table:table-column table:style-name="Table5.A" table:number-columns-repeated="2"/>
        <table:table-row>
          <table:table-cell table:style-name="Table5.A1" office:value-type="string">
            <text:p text:style-name="P31">Daniel 7:18</text:p>
          </table:table-cell>
          <table:table-cell table:style-name="Table5.B1" office:value-type="string">
            <text:p text:style-name="P32">But the <text:span text:style-name="T97">saints</text:span></text:p>
          </table:table-cell>
        </table:table-row>
        <table:table-row>
          <table:table-cell table:style-name="Table5.A2" office:value-type="string">
            <text:p text:style-name="P31">Daniel 7:21</text:p>
          </table:table-cell>
          <table:table-cell table:style-name="Table5.B2" office:value-type="string">
            <text:p text:style-name="P32">the <text:span text:style-name="T97">saints</text:span></text:p>
          </table:table-cell>
        </table:table-row>
        <table:table-row>
          <table:table-cell table:style-name="Table5.A2" office:value-type="string">
            <text:p text:style-name="P33">Daniel 7:22</text:p>
          </table:table-cell>
          <table:table-cell table:style-name="Table5.B2" office:value-type="string">
            <text:p text:style-name="P34">to the <text:span text:style-name="T97">saints</text:span></text:p>
          </table:table-cell>
        </table:table-row>
        <table:table-row>
          <table:table-cell table:style-name="Table5.A2" office:value-type="string">
            <text:p text:style-name="P33">Daniel 7:25</text:p>
          </table:table-cell>
          <table:table-cell table:style-name="Table5.B2" office:value-type="string">
            <text:p text:style-name="P34">the <text:span text:style-name="T97">saints</text:span></text:p>
          </table:table-cell>
        </table:table-row>
        <table:table-row>
          <table:table-cell table:style-name="Table5.A2" office:value-type="string">
            <text:p text:style-name="P33">Daniel 7:27</text:p>
          </table:table-cell>
          <table:table-cell table:style-name="Table5.B2" office:value-type="string">
            <text:p text:style-name="P34">of the <text:span text:style-name="T97">saints</text:span></text:p>
          </table:table-cell>
        </table:table-row>
      </table:table>
      <text:p text:style-name="P35"/>
      <text:p text:style-name="P35">It also shows up elsewhere as “<text:span text:style-name="T11">and an holy one</text:span>”, “<text:span text:style-name="T11">of the holy</text:span>”, and “<text:span text:style-name="T11">of the holy one</text:span><text:span text:style-name="T98">s</text:span>” but when searching for a definition we can’t <text:span text:style-name="T89">necessarily </text:span>use the word itself.</text:p>
      <text:p text:style-name="P36"><text:soft-page-break/>We don’t even need to look at where H6918 shows up but if you are curious it appears as the word “saint/saints” <text:span text:style-name="T99">in </text:span>12 out of the 116 times it appears in the Bible <text:span text:style-name="T100">(</text:span><text:span text:style-name="T101">Deu 33:3</text:span><text:span text:style-name="T100">, </text:span><text:span text:style-name="T101">Job 5:1,15:15</text:span><text:span text:style-name="T100">, </text:span><text:span text:style-name="T102">Psa 16:3,34:9, 89:5,7</text:span><text:span text:style-name="T103">, </text:span><text:span text:style-name="T102">106:16</text:span><text:span text:style-name="T103">, </text:span><text:span text:style-name="T104">Dan 8:13</text:span><text:span text:style-name="T105"> </text:span><text:span text:style-name="T106">[the first two </text:span><text:span text:style-name="T107">but not the third which is italicized</text:span><text:span text:style-name="T106">]</text:span><text:span text:style-name="T105">, </text:span><text:span text:style-name="T104">Hos 11:12</text:span><text:span text:style-name="T105">, </text:span><text:span text:style-name="T104">Zec 14:5</text:span><text:span text:style-name="T100">)</text:span>.</text:p>
      <text:p text:style-name="P36"/>
      <text:p text:style-name="P37">So, who are these watchers? The Bible couldn’t be any more clear. It’s exactly the same entity that John encountered in</text:p>
      <text:p text:style-name="P37"/>
      <table:table table:name="Table6" table:style-name="Table6">
        <table:table-column table:style-name="Table6.A"/>
        <table:table-row>
          <table:table-cell table:style-name="Table6.A1" office:value-type="string">
            <text:p text:style-name="P4">Revelation 19:9-10</text:p>
            <text:p text:style-name="Table_20_Contents"><text:span text:style-name="T1">9</text:span> And he saith unto me, Write, Blessed are they which are called unto the marriage supper of the Lamb. And he saith unto me, These are the true sayings of God.</text:p>
            <text:p text:style-name="Table_20_Contents"><text:span text:style-name="T1">10</text:span> And I fell at his feet to worship him. And he said unto me, See thou do it not: <text:span text:style-name="T5">I am thy fellowservant</text:span>, and <text:span text:style-name="T5">of thy brethren that have the testimony of Jesus</text:span>: worship God: for the testimony of Jesus is the spirit of prophecy.</text:p>
          </table:table-cell>
        </table:table-row>
      </table:table>
      <text:p text:style-name="P37"/>
      <text:p text:style-name="P38">Who <text:span text:style-name="T16">exactly</text:span> is the “he” in verse 9? <text:span text:style-name="T108">It’s one of the seven angels from </text:span><text:span text:style-name="T109">Revelation 17:1</text:span><text:span text:style-name="T108"> that was speaking to John.</text:span></text:p>
      <text:p text:style-name="P39"/>
      <table:table table:name="Table7" table:style-name="Table7">
        <table:table-column table:style-name="Table7.A" table:number-columns-repeated="2"/>
        <table:table-row>
          <table:table-cell table:style-name="Table7.A1" office:value-type="string">
            <text:p text:style-name="P4">Revelation 17:1</text:p>
          </table:table-cell>
          <table:table-cell table:style-name="Table7.B1" office:value-type="string">
            <text:p text:style-name="P40"><text:span text:style-name="T5">One of the seven angels</text:span> which had the seven vials</text:p>
          </table:table-cell>
        </table:table-row>
        <table:table-row>
          <table:table-cell table:style-name="Table7.A2" office:value-type="string">
            <text:p text:style-name="P41">Revelation 17:3</text:p>
          </table:table-cell>
          <table:table-cell table:style-name="Table7.B2" office:value-type="string">
            <text:p text:style-name="P40">So <text:span text:style-name="T5">he</text:span> carried me away in the spirit</text:p>
          </table:table-cell>
        </table:table-row>
        <table:table-row>
          <table:table-cell table:style-name="Table7.A2" office:value-type="string">
            <text:p text:style-name="P42">Revelation 17:7</text:p>
          </table:table-cell>
          <table:table-cell table:style-name="Table7.B2" office:value-type="string">
            <text:p text:style-name="P43">And <text:span text:style-name="T5">the angel</text:span> said unto me</text:p>
          </table:table-cell>
        </table:table-row>
        <table:table-row>
          <table:table-cell table:style-name="Table7.A2" office:value-type="string">
            <text:p text:style-name="P42">Revelation 17:<text:span text:style-name="T110">15</text:span></text:p>
          </table:table-cell>
          <table:table-cell table:style-name="Table7.B2" office:value-type="string">
            <text:p text:style-name="P44">And <text:span text:style-name="T5">he</text:span> saith unto me</text:p>
          </table:table-cell>
        </table:table-row>
        <table:table-row>
          <table:table-cell table:style-name="Table7.A2" office:value-type="string">
            <text:p text:style-name="P45">Revelation 18</text:p>
          </table:table-cell>
          <table:table-cell table:style-name="Table7.B2" office:value-type="string">
            <text:p text:style-name="P46">John sees <text:span text:style-name="T11">another</text:span> <text:span text:style-name="T111">angel</text:span>, hears <text:span text:style-name="T11">another</text:span> voice from heaven, sees <text:span text:style-name="T11">another</text:span> mighty angel cast a stone into the sea</text:p>
          </table:table-cell>
        </table:table-row>
        <table:table-row>
          <table:table-cell table:style-name="Table7.A2" office:value-type="string">
            <text:p text:style-name="P47">Revelation 1<text:span text:style-name="T112">9:9</text:span></text:p>
          </table:table-cell>
          <table:table-cell table:style-name="Table7.B2" office:value-type="string">
            <text:p text:style-name="P48">And <text:span text:style-name="T5">he</text:span> saith unto me</text:p>
          </table:table-cell>
        </table:table-row>
      </table:table>
      <text:p text:style-name="P49"/>
      <text:p text:style-name="P50">And when <text:span text:style-name="T113">we </text:span><text:span text:style-name="T114">combine</text:span><text:span text:style-name="T113"> what we learned about the “</text:span><text:span text:style-name="T115">holy ones</text:span><text:span text:style-name="T113">” with </text:span>the definition of the <text:span text:style-name="T116">Hebrew</text:span> word <text:span text:style-name="T116">H5782 that the Aramaic H5894 </text:span>“watcher” <text:span text:style-name="T116">corresponds to </text:span>in <text:span text:style-name="T2">Daniel 4:13</text:span> it <text:span text:style-name="T114">becomes even more clear</text:span>:</text:p>
      <text:p text:style-name="P50"/>
      <table:table table:name="Table9" table:style-name="Table9">
        <table:table-column table:style-name="Table9.A"/>
        <table:table-row>
          <table:table-cell table:style-name="Table9.A1" office:value-type="string">
            <text:p text:style-name="P51">H5782</text:p>
            <text:p text:style-name="P51"/>
            <text:p text:style-name="P52"><text:span text:style-name="T16">עוּר</text:span> ʻûwr, oor; a primitive root (rather identical with through the idea of opening the eyes); <text:span text:style-name="T7">to wake</text:span> (literally or figuratively):—(a-) wake(-n, up), lift up (self), × master, raise (up), stir up (self).</text:p>
            <text:p text:style-name="P52"/>
            <text:p text:style-name="P53"><text:span text:style-name="T16">Translated elsewhere as</text:span>: awake, stir up, lifted up, raise, raised up, waked, wake up, waketh, stirred up, stirreth up, etc.</text:p>
          </table:table-cell>
        </table:table-row>
      </table:table>
      <text:p text:style-name="P54"/>
      <text:p text:style-name="P55"><text:span text:style-name="T117">And so when it says “</text:span><text:span text:style-name="T118">a watcher and an holy one</text:span><text:span text:style-name="T117">” we can think of it as “a raised up saint” or “an awakened </text:span><text:span text:style-name="T119">saint</text:span><text:span text:style-name="T117">”.</text:span></text:p>
      <text:p text:style-name="P55"/>
      <text:p text:style-name="P55"><text:span text:style-name="T117">In other words, these watchers are </text:span><text:span text:style-name="T120">humans that</text:span><text:span text:style-name="T117"> died </text:span><text:span text:style-name="T120">in Christ (saints) </text:span><text:span text:style-name="T117">and moved on to glory and </text:span><text:span text:style-name="T4">were and </text:span><text:span text:style-name="T117">are serving God </text:span><text:span text:style-name="T120">as we can see in both the old </text:span><text:span text:style-name="T121">(</text:span><text:span text:style-name="T122">Daniel 4:13,17,23</text:span><text:span text:style-name="T121">) </text:span><text:span text:style-name="T120">and the new testament </text:span><text:span text:style-name="T123">(</text:span><text:span text:style-name="T124">Rev</text:span><text:span text:style-name="T122">elation</text:span><text:span text:style-name="T124"> 19:10</text:span><text:span text:style-name="T123">)</text:span><text:span text:style-name="T1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9T09:20:39.039103221</meta:creation-date>
    <dc:title>Who or what is a Watcher?</dc:title>
    <meta:editing-duration>PT5H16M31S</meta:editing-duration>
    <meta:editing-cycles>190</meta:editing-cycles>
    <meta:generator>LibreOffice/26.2.4.2$Linux_X86_64 LibreOffice_project/64a984c51f4702dbd3710b13428c673a2f1292e7</meta:generator>
    <dc:date>2026-07-11T12:30:44.454932984</dc:date>
    <meta:print-date>2026-06-09T14:58:43.180292535</meta:print-date>
    <meta:printed-by>PDF files</meta:printed-by>
    <meta:document-statistic meta:table-count="8" meta:image-count="1" meta:object-count="0" meta:page-count="4" meta:paragraph-count="80" meta:word-count="1754" meta:character-count="9715" meta:non-whitespace-character-count="8052"/>
    <meta:template xlink:type="simple" xlink:actuate="onRequest" xlink:title="default" xlink:href="../../../../Templates/default.ott" meta:date="2026-06-09T09:20:36.984854342"/>
  </office:meta>
</office:document-meta>
</file>