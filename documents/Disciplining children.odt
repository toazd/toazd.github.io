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P1" style:family="paragraph" style:parent-style-name="Table_20_Contents">
      <style:text-properties officeooo:paragraph-rsid="001136f8"/>
    </style:style>
    <style:style style:name="P2" style:family="paragraph" style:parent-style-name="Table_20_Contents" style:list-style-name="L1">
      <style:text-properties style:text-position="0% 100%" officeooo:paragraph-rsid="0012ae62"/>
    </style:style>
    <style:style style:name="P3" style:family="paragraph" style:parent-style-name="Table_20_Contents" style:list-style-name="L1">
      <style:text-properties style:text-position="0% 100%" officeooo:rsid="0012ae62" officeooo:paragraph-rsid="0012ae62"/>
    </style:style>
    <style:style style:name="P4" style:family="paragraph" style:parent-style-name="Table_20_Contents" style:list-style-name="L1">
      <style:text-properties style:text-position="0% 100%" officeooo:rsid="0014cf1c" officeooo:paragraph-rsid="0014cf1c"/>
    </style:style>
    <style:style style:name="P5" style:family="paragraph" style:parent-style-name="Table_20_Contents" style:list-style-name="L1">
      <style:text-properties style:text-position="0% 100%" officeooo:rsid="001431e8" officeooo:paragraph-rsid="001431e8"/>
    </style:style>
    <style:style style:name="T1" style:family="text">
      <style:text-properties fo:color="#127622" loext:opacity="100%"/>
    </style:style>
    <style:style style:name="T2" style:family="text">
      <style:text-properties fo:background-color="#fff5ce" loext:char-shading-value="0"/>
    </style:style>
    <style:style style:name="T3" style:family="text">
      <style:text-properties style:text-position="super 58%" officeooo:rsid="001136f8"/>
    </style:style>
    <style:style style:name="T4" style:family="text">
      <style:text-properties style:text-position="33% 80%"/>
    </style:style>
    <style:style style:name="T5" style:family="text">
      <style:text-properties officeooo:rsid="001136f8"/>
    </style:style>
    <style:style style:name="T6" style:family="text">
      <style:text-properties officeooo:rsid="0012ee0c"/>
    </style:style>
    <style:style style:name="T7" style:family="text">
      <style:text-properties officeooo:rsid="001428b1"/>
    </style:style>
    <style:style style:name="T8" style:family="text">
      <style:text-properties officeooo:rsid="001431e8"/>
    </style:style>
    <style:style style:name="T9" style:family="text">
      <style:text-properties officeooo:rsid="0014cf1c"/>
    </style:style>
    <style:style style:name="T10" style:family="text">
      <style:text-properties officeooo:rsid="0015625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1">Proverbs 19:18</text:span><text:line-break/>Chasten thy son while there is hope, and <text:span text:style-name="T2">let not thy soul spare for his crying</text:span>.</text:p>
            <text:p text:style-name="Table_20_Contents"/>
            <text:p text:style-name="P1"><text:span text:style-name="T1">Proverbs 22:15</text:span><text:line-break/>Foolishness is bound in the heart of a child; but the rod<text:span text:style-name="T3">H7626</text:span> of <text:span text:style-name="T2">correction shall drive it far from him</text:span>.</text:p>
            <text:p text:style-name="Table_20_Contents"/>
            <text:p text:style-name="P1"><text:span text:style-name="T1">Proverbs 23:13-14</text:span><text:line-break/><text:span text:style-name="T4">13</text:span> <text:span text:style-name="T2">Withhold not correction from the child</text:span>: for if thou beatest him with the rod<text:span text:style-name="T3">H7626</text:span>, he shall not die. <text:line-break/><text:span text:style-name="T4">14</text:span> <text:span text:style-name="T2">Thou shalt beat him with the rod</text:span><text:span text:style-name="T3">H7626</text:span>, and shalt deliver his soul from hell.</text:p>
          </table:table-cell>
        </table:table-row>
      </table:table>
      <text:list text:style-name="L1">
        <text:list-item>
          <text:p text:style-name="P2"><text:span text:style-name="T5">H7626</text:span></text:p>
          <text:list>
            <text:list-item>
              <text:p text:style-name="P3">sceptre (Gen 49:10), tribes (Gen 49:16, many others), <text:span text:style-name="T6">pen (Jdg 5:14), </text:span><text:span text:style-name="T7">darts (2Sa 18:14), </text:span><text:span text:style-name="T8">correction (Job 37:13)</text:span></text:p>
            </text:list-item>
            <text:list-item>
              <text:p text:style-name="P4">Literal translation: tribe (as in a branch)</text:p>
            </text:list-item>
            <text:list-item>
              <text:p text:style-name="P5">Litera<text:span text:style-name="T9">l interpretation</text:span>: a “branch”/<text:span text:style-name="T10">stick</text:span> [of wood]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2T16:17:17.323537000</meta:creation-date>
    <dc:title>default</dc:title>
    <meta:editing-duration>PT12M3S</meta:editing-duration>
    <meta:editing-cycles>11</meta:editing-cycles>
    <meta:generator>LibreOffice/25.8.1.1$Windows_X86_64 LibreOffice_project/54047653041915e595ad4e45cccea684809c77b5</meta:generator>
    <dc:date>2025-09-12T16:29:24.831730900</dc:date>
    <meta:document-statistic meta:table-count="1" meta:image-count="0" meta:object-count="0" meta:page-count="1" meta:paragraph-count="7" meta:word-count="111" meta:character-count="629" meta:non-whitespace-character-count="528"/>
    <meta:template xlink:type="simple" xlink:actuate="onRequest" xlink:title="default" xlink:href="../../../../AppData/Roaming/LibreOffice/4/user/template/default.ott" meta:date="2025-09-12T16:17:17.073540300"/>
  </office:meta>
</office:document-meta>
</file>