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715in" table:align="left"/>
    </style:style>
    <style:style style:name="Table1.A" style:family="table-column">
      <style:table-column-properties style:column-width="3.9694in"/>
    </style:style>
    <style:style style:name="Table1.B" style:family="table-column">
      <style:table-column-properties style:column-width="4.002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715in" fo:break-before="page" table:align="left"/>
    </style:style>
    <style:style style:name="Table3.A" style:family="table-column">
      <style:table-column-properties style:column-width="3.9694in"/>
    </style:style>
    <style:style style:name="Table3.B" style:family="table-column">
      <style:table-column-properties style:column-width="4.0021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12pt" officeooo:rsid="0015a5cd" officeooo:paragraph-rsid="0015a5cd" style:font-name-asian="Noto Sans Mono CJK SC" style:font-size-asian="12pt" style:font-name-complex="Liberation Mono" style:font-size-complex="12pt"/>
    </style:style>
    <style:style style:name="P2" style:family="paragraph" style:parent-style-name="Table_20_Contents">
      <style:paragraph-properties fo:text-align="left" style:justify-single-word="false"/>
      <style:text-properties style:font-name="Liberation Sans" fo:font-size="12pt" officeooo:rsid="0015a5cd" officeooo:paragraph-rsid="0015a5cd" style:font-name-asian="Noto Sans Mono CJK SC" style:font-size-asian="12pt" style:font-name-complex="Liberation Mono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2pt" officeooo:rsid="0015a5cd" officeooo:paragraph-rsid="003f6acc" style:font-name-asian="Noto Sans Mono CJK SC" style:font-size-asian="12pt" style:font-name-complex="Liberation Mono" style:font-size-complex="12pt"/>
    </style:style>
    <style:style style:name="P4" style:family="paragraph" style:parent-style-name="Table_20_Contents">
      <style:paragraph-properties fo:text-align="left" style:justify-single-word="false"/>
      <style:text-properties style:font-name="Liberation Sans" fo:font-size="12pt" officeooo:rsid="0015a5cd" officeooo:paragraph-rsid="003f6acc" style:font-name-asian="Noto Sans Mono CJK SC" style:font-size-asian="12pt" style:font-name-complex="Liberation Mono" style:font-size-complex="12pt"/>
    </style:style>
    <style:style style:name="P5" style:family="paragraph" style:parent-style-name="Table_20_Contents">
      <style:text-properties style:font-name="Liberation Sans" fo:font-size="12pt" style:font-name-asian="Noto Sans Mono CJK SC" style:font-size-asian="12pt" style:font-name-complex="Liberation Mono" style:font-size-complex="12pt"/>
    </style:style>
    <style:style style:name="P6" style:family="paragraph" style:parent-style-name="Table_20_Contents">
      <style:text-properties style:font-name="Liberation Sans" fo:font-size="12pt" officeooo:paragraph-rsid="002acd39" style:font-name-asian="Noto Sans Mono CJK SC" style:font-size-asian="12pt" style:font-name-complex="Liberation Mono" style:font-size-complex="12pt"/>
    </style:style>
    <style:style style:name="P7" style:family="paragraph" style:parent-style-name="Table_20_Contents">
      <style:text-properties style:font-name="Liberation Sans" fo:font-size="12pt" officeooo:paragraph-rsid="002c62f6" style:font-name-asian="Noto Sans Mono CJK SC" style:font-size-asian="12pt" style:font-name-complex="Liberation Mono" style:font-size-complex="12pt"/>
    </style:style>
    <style:style style:name="P8" style:family="paragraph" style:parent-style-name="Table_20_Contents">
      <style:text-properties style:font-name="Liberation Sans" fo:font-size="12pt" officeooo:paragraph-rsid="001e8f26" style:font-name-asian="Noto Sans Mono CJK SC" style:font-size-asian="12pt" style:font-name-complex="Liberation Mono" style:font-size-complex="12pt"/>
    </style:style>
    <style:style style:name="P9" style:family="paragraph" style:parent-style-name="Table_20_Contents">
      <style:text-properties style:font-name="Liberation Sans" fo:font-size="12pt" officeooo:paragraph-rsid="0039ac53" style:font-name-asian="Noto Sans Mono CJK SC" style:font-size-asian="12pt" style:font-name-complex="Liberation Mono" style:font-size-complex="12pt"/>
    </style:style>
    <style:style style:name="P10" style:family="paragraph" style:parent-style-name="Table_20_Contents">
      <style:text-properties style:font-name="Liberation Sans" fo:font-size="12pt" officeooo:paragraph-rsid="00235756" style:font-name-asian="Noto Sans Mono CJK SC" style:font-size-asian="12pt" style:font-name-complex="Liberation Mono" style:font-size-complex="12pt"/>
    </style:style>
    <style:style style:name="P11" style:family="paragraph" style:parent-style-name="Table_20_Contents">
      <style:text-properties style:font-name="Liberation Sans" fo:font-size="12pt" officeooo:paragraph-rsid="0023b6cb" style:font-name-asian="Noto Sans Mono CJK SC" style:font-size-asian="12pt" style:font-name-complex="Liberation Mono" style:font-size-complex="12pt"/>
    </style:style>
    <style:style style:name="P12" style:family="paragraph" style:parent-style-name="Table_20_Contents">
      <style:text-properties style:font-name="Liberation Sans" fo:font-size="12pt" officeooo:paragraph-rsid="003b2836" style:font-name-asian="Noto Sans Mono CJK SC" style:font-size-asian="12pt" style:font-name-complex="Liberation Mono" style:font-size-complex="12pt"/>
    </style:style>
    <style:style style:name="P13" style:family="paragraph" style:parent-style-name="Table_20_Contents">
      <style:text-properties style:font-name="Liberation Sans" fo:font-size="12pt" officeooo:paragraph-rsid="00256995" style:font-name-asian="Noto Sans Mono CJK SC" style:font-size-asian="12pt" style:font-name-complex="Liberation Mono" style:font-size-complex="12pt"/>
    </style:style>
    <style:style style:name="P14" style:family="paragraph" style:parent-style-name="Table_20_Contents">
      <style:text-properties style:font-name="Liberation Sans" fo:font-size="12pt" officeooo:paragraph-rsid="00308395" style:font-name-asian="Noto Sans Mono CJK SC" style:font-size-asian="12pt" style:font-name-complex="Liberation Mono" style:font-size-complex="12pt"/>
    </style:style>
    <style:style style:name="P15" style:family="paragraph" style:parent-style-name="Preformatted_20_Text"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87f43"/>
    </style:style>
    <style:style style:name="T3" style:family="text">
      <style:text-properties style:text-position="super 58%" officeooo:rsid="00287f43"/>
    </style:style>
    <style:style style:name="T4" style:family="text">
      <style:text-properties style:text-position="0% 100%" officeooo:rsid="00287f43"/>
    </style:style>
    <style:style style:name="T5" style:family="text">
      <style:text-properties style:text-position="33% 80%" officeooo:rsid="00287f43"/>
    </style:style>
    <style:style style:name="T6" style:family="text">
      <style:text-properties style:text-position="0% 100%" fo:font-style="italic" officeooo:rsid="00287f43" fo:background-color="#ffff00" loext:char-shading-value="0"/>
    </style:style>
    <style:style style:name="T7" style:family="text">
      <style:text-properties style:text-position="0% 100%" officeooo:rsid="00287f43" fo:background-color="#ffff00" loext:char-shading-value="0"/>
    </style:style>
    <style:style style:name="T8" style:family="text">
      <style:text-properties officeooo:rsid="002951fa"/>
    </style:style>
    <style:style style:name="T9" style:family="text">
      <style:text-properties style:text-position="super 58%" officeooo:rsid="002951fa"/>
    </style:style>
    <style:style style:name="T10" style:family="text">
      <style:text-properties style:text-position="0% 100%" officeooo:rsid="002951fa"/>
    </style:style>
    <style:style style:name="T11" style:family="text">
      <style:text-properties style:text-position="0% 100%" fo:font-style="italic" officeooo:rsid="002951fa"/>
    </style:style>
    <style:style style:name="T12" style:family="text">
      <style:text-properties style:text-position="0% 100%" officeooo:rsid="002951fa" fo:background-color="#ffff00" loext:char-shading-value="0"/>
    </style:style>
    <style:style style:name="T13" style:family="text">
      <style:text-properties style:text-position="33% 80%"/>
    </style:style>
    <style:style style:name="T14" style:family="text">
      <style:text-properties fo:background-color="#ffff00" loext:char-shading-value="0"/>
    </style:style>
    <style:style style:name="T15" style:family="text">
      <style:text-properties fo:font-style="italic"/>
    </style:style>
    <style:style style:name="T16" style:family="text">
      <style:text-properties style:text-position="33% 80%" officeooo:rsid="002acd39"/>
    </style:style>
    <style:style style:name="T17" style:family="text">
      <style:text-properties fo:background-color="#ffbf00" loext:char-shading-value="0"/>
    </style:style>
    <style:style style:name="T18" style:family="text">
      <style:text-properties fo:background-color="#fff5ce" loext:char-shading-value="0"/>
    </style:style>
    <style:style style:name="T19" style:family="text">
      <style:text-properties style:text-position="33% 80%" officeooo:rsid="002c62f6"/>
    </style:style>
    <style:style style:name="T20" style:family="text">
      <style:text-properties style:text-position="33% 80%" officeooo:rsid="001e8f26"/>
    </style:style>
    <style:style style:name="T21" style:family="text">
      <style:text-properties style:text-position="33% 80%" officeooo:rsid="0039ac53"/>
    </style:style>
    <style:style style:name="T22" style:family="text">
      <style:text-properties style:text-position="33% 80%" officeooo:rsid="00235756"/>
    </style:style>
    <style:style style:name="T23" style:family="text">
      <style:text-properties style:text-position="33% 80%" officeooo:rsid="0023b6cb"/>
    </style:style>
    <style:style style:name="T24" style:family="text">
      <style:text-properties style:text-position="33% 80%" officeooo:rsid="003b2836"/>
    </style:style>
    <style:style style:name="T25" style:family="text">
      <style:text-properties style:text-position="33% 80%" officeooo:rsid="00256995"/>
    </style:style>
    <style:style style:name="T26" style:family="text">
      <style:text-properties style:text-position="33% 80%" fo:font-style="normal" officeooo:rsid="00308395" style:font-style-asian="normal" style:font-style-complex="normal"/>
    </style:style>
    <style:style style:name="T27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Genesis 49</text:span> <text:span text:style-name="T2">(Israel</text:span><text:span text:style-name="T3">2</text:span><text:span text:style-name="T4">)</text:span></text:p>
            <text:p text:style-name="P2"><text:span text:style-name="T4"><text:line-break/></text:span><text:span text:style-name="T5">1</text:span><text:span text:style-name="T4"> And Jacob called unto his sons, and said, Gather yourselves together, that I may tell you </text:span><text:span text:style-name="T6">that</text:span><text:span text:style-name="T7"> which shall befall you in the last days</text:span><text:span text:style-name="T4">.</text:span><text:span text:style-name="T5">2</text:span><text:span text:style-name="T4"> Gather yourselves together, and hear, ye sons of Jacob; and hearken unto Israel your father.</text:span></text:p>
          </table:table-cell>
          <table:table-cell table:style-name="Table1.B1" office:value-type="string">
            <text:p text:style-name="P3"><text:span text:style-name="T1">Deuteronomy 33</text:span> <text:span text:style-name="T8">(Moses</text:span><text:span text:style-name="T9">1</text:span><text:span text:style-name="T10">)</text:span></text:p>
            <text:p text:style-name="P4"><text:span text:style-name="T10"><text:line-break/>And this </text:span><text:span text:style-name="T11">is</text:span><text:span text:style-name="T10"> the blessing, wherewith Moses the man of God </text:span><text:span text:style-name="T12">blessed the children of Israel</text:span><text:span text:style-name="T10"> before his death.</text:span></text:p>
          </table:table-cell>
        </table:table-row>
        <table:table-row>
          <table:table-cell table:style-name="Table1.A2" office:value-type="string">
            <text:p text:style-name="P5"><text:span text:style-name="T13">3</text:span> <text:span text:style-name="T14">Reuben</text:span>, thou <text:span text:style-name="T15">art</text:span> my firstborn, my might, and the beginning of my strength, the excellency of dignity, and the excellency of power:<text:span text:style-name="T13">4</text:span> Unstable as water, thou shalt not excel; because thou wentest up to thy father's bed; then defiledst thou <text:span text:style-name="T15">it</text:span>: he went up to my couch.</text:p>
          </table:table-cell>
          <table:table-cell table:style-name="Table1.B2" office:value-type="string">
            <text:p text:style-name="P6"><text:span text:style-name="T16">6</text:span> Let <text:span text:style-name="T14">Reuben</text:span> live, and not die; and let <text:span text:style-name="T15">not</text:span> his men be few.</text:p>
          </table:table-cell>
        </table:table-row>
        <table:table-row>
          <table:table-cell table:style-name="Table1.A2" office:value-type="string">
            <text:p text:style-name="P5"><text:span text:style-name="T13">5</text:span> <text:span text:style-name="T17">Simeon</text:span> and <text:span text:style-name="T14">Levi</text:span> <text:span text:style-name="T15">are</text:span> brethren; instruments of cruelty <text:span text:style-name="T15">are in</text:span> their habitations.<text:span text:style-name="T13">6</text:span> O my soul, come not thou into their secret; unto their assembly, mine honour, be not thou united: for in their anger they slew a man, and in their selfwill they digged down a wall.<text:span text:style-name="T13">7</text:span> Cursed <text:span text:style-name="T15">be</text:span> their anger, for <text:span text:style-name="T15">it was</text:span> fierce; and their wrath, for it was cruel: <text:span text:style-name="T18">I will divide them in Jacob, and scatter them in Israel</text:span>.</text:p>
          </table:table-cell>
          <table:table-cell table:style-name="Table1.B2" office:value-type="string">
            <text:p text:style-name="P5"><text:span text:style-name="T13">8</text:span> And of <text:span text:style-name="T14">Levi</text:span> he said, <text:span text:style-name="T15">Let</text:span> thy Thummim and thy Urim <text:span text:style-name="T15">be</text:span> with thy holy one, whom thou didst prove at Massah, <text:span text:style-name="T15">and with</text:span> whom thou didst strive at the waters of Meribah;<text:span text:style-name="T13">9</text:span> Who said unto his father and to his mother, I have not seen him; neither did he acknowledge his brethren, nor knew his own children: for they have observed thy word, and kept thy covenant.<text:span text:style-name="T13">10</text:span> They shall teach Jacob thy judgments, and Israel thy law: they shall put incense before thee, and whole burnt sacrifice upon thine altar.<text:span text:style-name="T13">11</text:span> Bless, LORD, his substance, and accept the work of his hands: smite through the loins of them that rise against him, and of them that hate him, that they rise not again.</text:p>
          </table:table-cell>
        </table:table-row>
        <table:table-row>
          <table:table-cell table:style-name="Table1.A2" office:value-type="string">
            <text:p text:style-name="P5"><text:span text:style-name="T13">8</text:span> <text:span text:style-name="T14">Judah</text:span>, thou <text:span text:style-name="T15">art he</text:span> whom thy brethren shall praise: thy hand <text:span text:style-name="T15">shall be</text:span> in the neck of thine enemies; thy father's children shall bow down before thee.<text:span text:style-name="T13">9</text:span> <text:span text:style-name="T14">Judah</text:span> <text:span text:style-name="T15">is</text:span> a lion's whelp: from the prey, my son, thou art gone up: he stooped down, he couched as a lion, and as an old lion; who shall rouse him up?<text:span text:style-name="T13">10</text:span> The sceptre shall not depart from <text:span text:style-name="T14">Judah</text:span>, nor a lawgiver from between his feet, until Shiloh come; and unto him <text:span text:style-name="T15">shall</text:span> the gathering of the people <text:span text:style-name="T15">be</text:span>.<text:span text:style-name="T13">11</text:span> Binding his foal unto the vine, and his ass's colt unto the choice vine; he washed his garments in wine, and his clothes in the blood of grapes:<text:span text:style-name="T13">12</text:span> His eyes <text:span text:style-name="T15">shall be</text:span> red with wine, and his teeth white with milk.</text:p>
          </table:table-cell>
          <table:table-cell table:style-name="Table1.B2" office:value-type="string">
            <text:p text:style-name="P7"><text:span text:style-name="T19">7</text:span> And this <text:span text:style-name="T15">is the blessing</text:span> of <text:span text:style-name="T14">Judah</text:span>: and he said, Hear, LORD, the voice of <text:span text:style-name="T14">Judah</text:span>, and bring him unto his people: let his hands be sufficient for him; and be thou an help <text:span text:style-name="T15">to him</text:span> from his enemies.</text:p>
          </table:table-cell>
        </table:table-row>
        <table:table-row>
          <table:table-cell table:style-name="Table1.A2" office:value-type="string">
            <text:p text:style-name="P8"><text:span text:style-name="T13">1</text:span><text:span text:style-name="T20">3</text:span> <text:span text:style-name="T14">Zebulun</text:span> shall dwell at the haven of the sea; and he <text:span text:style-name="T15">shall be</text:span> for an haven of ships; and his border <text:span text:style-name="T15">shall be</text:span> unto Zidon.</text:p>
          </table:table-cell>
          <table:table-cell table:style-name="Table1.B2" table:number-rows-spanned="2" office:value-type="string">
            <text:p text:style-name="P5"><text:span text:style-name="T13">18</text:span> And of <text:span text:style-name="T14">Zebulun</text:span> he said, Rejoice, <text:span text:style-name="T14">Zebulun</text:span>, in thy going out; and, <text:span text:style-name="T14">Issachar</text:span>, in thy tents.<text:span text:style-name="T13">19</text:span> They shall call the people unto the mountain; there they shall offer sacrifices of righteousness: for they shall suck <text:span text:style-name="T15">of</text:span> the abundance of the seas, and <text:span text:style-name="T15">of</text:span> treasures hid in the sand.</text:p>
          </table:table-cell>
        </table:table-row>
        <table:table-row>
          <table:table-cell table:style-name="Table1.A2" office:value-type="string">
            <text:p text:style-name="P5"><text:span text:style-name="T13">14</text:span> <text:span text:style-name="T14">Issachar</text:span> <text:span text:style-name="T15">is</text:span> a strong ass couching down between two burdens:<text:span text:style-name="T13">15</text:span> And he saw that rest <text:span text:style-name="T15">was</text:span> good, and the land that <text:span text:style-name="T15">it was</text:span> pleasant; and bowed his shoulder to bear, and became a servant unto tribute.</text:p>
          </table:table-cell>
          <table:covered-table-cell table:style-name="Table1.B2"/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<text:span text:style-name="T13">16</text:span> <text:span text:style-name="T14">Dan</text:span> shall judge his people, as one of the tribes of Israel.<text:span text:style-name="T13">17</text:span> <text:span text:style-name="T14">Dan</text:span> shall be a serpent by the way, an adder in the path, that biteth the horse heels, so that his rider shall fall backward.</text:p>
          </table:table-cell>
          <table:table-cell table:style-name="Table3.B1" office:value-type="string">
            <text:p text:style-name="P9"><text:span text:style-name="T21">22</text:span> And of <text:span text:style-name="T14">Dan</text:span> he said, <text:span text:style-name="T14">Dan</text:span> <text:span text:style-name="T15">is</text:span> a lion's whelp: he shall leap from Bashan.</text:p>
          </table:table-cell>
        </table:table-row>
        <table:table-row>
          <table:table-cell table:style-name="Table3.A2" office:value-type="string">
            <text:p text:style-name="P10"><text:span text:style-name="T13">1</text:span><text:span text:style-name="T22">9</text:span> <text:span text:style-name="T14">Gad</text:span>, a troop shall overcome him: but he shall overcome at the last.</text:p>
          </table:table-cell>
          <table:table-cell table:style-name="Table3.B2" office:value-type="string">
            <text:p text:style-name="P5"><text:span text:style-name="T13">20</text:span> And of <text:span text:style-name="T14">Gad</text:span> he said, Blessed <text:span text:style-name="T15">be</text:span> he that enlargeth <text:span text:style-name="T14">Gad</text:span>: he dwelleth as a lion, and teareth the arm with the crown of the head.<text:span text:style-name="T13">21</text:span> And he provided the first part for himself, because there, <text:span text:style-name="T15">in</text:span> a portion of the lawgiver, <text:span text:style-name="T15">was he</text:span> seated; and he came with the heads of the people, he executed the justice of the LORD, and his judgments with Israel.</text:p>
          </table:table-cell>
        </table:table-row>
        <table:table-row>
          <table:table-cell table:style-name="Table3.A2" office:value-type="string">
            <text:p text:style-name="P10"><text:span text:style-name="T22">20</text:span> Out of <text:span text:style-name="T14">Asher</text:span> his bread <text:span text:style-name="T15">shall be</text:span> fat, and he shall yield royal dainties.</text:p>
          </table:table-cell>
          <table:table-cell table:style-name="Table3.B2" office:value-type="string">
            <text:p text:style-name="P5"><text:span text:style-name="T13">24</text:span> And of <text:span text:style-name="T14">Asher</text:span> he said, <text:span text:style-name="T15">Let</text:span> <text:span text:style-name="T14">Asher</text:span> <text:span text:style-name="T15">be</text:span> blessed with children; let him be acceptable to his brethren, and let him dip his foot in oil.<text:span text:style-name="T13">25</text:span> Thy shoes <text:span text:style-name="T15">shall be</text:span> iron and brass; and as thy days, <text:span text:style-name="T15">so shall</text:span> thy strength <text:span text:style-name="T15">be</text:span>.</text:p>
          </table:table-cell>
        </table:table-row>
        <table:table-row>
          <table:table-cell table:style-name="Table3.A2" office:value-type="string">
            <text:p text:style-name="P11"><text:span text:style-name="T22">2</text:span><text:span text:style-name="T23">1</text:span> <text:span text:style-name="T14">Naphtali</text:span> <text:span text:style-name="T15">is</text:span> a hind let loose: he giveth goodly words.</text:p>
          </table:table-cell>
          <table:table-cell table:style-name="Table3.B2" office:value-type="string">
            <text:p text:style-name="P12"><text:span text:style-name="T22">2</text:span><text:span text:style-name="T24">3</text:span> And of <text:span text:style-name="T14">Naphtali</text:span> he said, O <text:span text:style-name="T14">Naphtali</text:span>, satisfied with favour, and full with the blessing of the LORD: possess thou the west and the south.</text:p>
          </table:table-cell>
        </table:table-row>
        <table:table-row>
          <table:table-cell table:style-name="Table3.A2" office:value-type="string">
            <text:p text:style-name="P5"><text:span text:style-name="T13">22</text:span> <text:span text:style-name="T14">Joseph</text:span> <text:span text:style-name="T15">is</text:span> a fruitful bough, <text:span text:style-name="T15">even</text:span> a fruitful bough by a well; <text:span text:style-name="T15">whose</text:span> branches run over the wall:<text:span text:style-name="T13">23</text:span> The archers have sorely grieved him, and shot <text:span text:style-name="T15">at him</text:span>, and hated him:<text:span text:style-name="T13">24</text:span> But his bow abode in strength, and the arms of his hands were made strong by the hands of the mighty <text:span text:style-name="T15">God</text:span> of Jacob; (from thence <text:span text:style-name="T15">is</text:span> the shepherd, the stone of Israel:)<text:span text:style-name="T13">25</text:span> <text:span text:style-name="T15">Even</text:span> by the God of thy father, who shall help thee; and by the Almighty, who shall bless thee with blessings of heaven above, blessings of the deep that lieth under, blessings of the breasts, and of the womb:<text:span text:style-name="T13">26</text:span> The blessings of thy father have prevailed above the blessings of my progenitors unto the utmost bound of the everlasting hills: they shall be on the head of <text:span text:style-name="T14">Joseph</text:span>, and on the crown of the head of him that was separate from his brethren.</text:p>
          </table:table-cell>
          <table:table-cell table:style-name="Table3.B2" office:value-type="string">
            <text:p text:style-name="P5"><text:span text:style-name="T13">13</text:span> And of <text:span text:style-name="T14">Joseph</text:span> he said, Blessed of the LORD <text:span text:style-name="T15">be</text:span> his land, for the precious things of heaven, for the dew, and for the deep that coucheth beneath,<text:span text:style-name="T13">14</text:span> And for the precious fruits <text:span text:style-name="T15">brought forth</text:span> by the sun, and for the precious things put forth by the moon,<text:span text:style-name="T13">15</text:span> And for the chief things of the ancient mountains, and for the precious things of the lasting hills,<text:span text:style-name="T13">16</text:span> And for the precious things of the earth and fulness thereof, and <text:span text:style-name="T15">for</text:span> the good will of him that dwelt in the bush: let <text:span text:style-name="T15">the blessing</text:span> come upon the head of <text:span text:style-name="T14">Joseph</text:span>, and upon the top of the head of him <text:span text:style-name="T15">that was</text:span> separated from his brethren.<text:span text:style-name="T13">17</text:span> His glory <text:span text:style-name="T15">is like</text:span> the firstling of his bullock, and his horns <text:span text:style-name="T15">are like</text:span> the horns of unicorns: with them he shall push the people together to the ends of the earth: and they <text:span text:style-name="T15">are</text:span> the ten thousands of <text:span text:style-name="T17">Ephraim</text:span>, and they <text:span text:style-name="T15">are</text:span> the thousands of <text:span text:style-name="T17">Manasseh</text:span>.</text:p>
          </table:table-cell>
        </table:table-row>
        <table:table-row>
          <table:table-cell table:style-name="Table3.A2" office:value-type="string">
            <text:p text:style-name="P13"><text:span text:style-name="T13">2</text:span><text:span text:style-name="T25">7</text:span> <text:span text:style-name="T14">Benjamin</text:span> shall ravin <text:span text:style-name="T15">as</text:span> a wolf: in the morning he shall devour the prey, and at night he shall divide the spoil.</text:p>
          </table:table-cell>
          <table:table-cell table:style-name="Table3.B2" office:value-type="string">
            <text:p text:style-name="P14"><text:span text:style-name="T26">12</text:span><text:span text:style-name="T27"> </text:span><text:span text:style-name="T15">And</text:span> of <text:span text:style-name="T14">Benjamin</text:span> he said, The beloved of the LORD shall dwell in safety by him; <text:span text:style-name="T15">and the LORD</text:span> shall cover him all the day long, and he shall dwell between his shoulders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59</meta:editing-cycles>
    <meta:editing-duration>PT2H19M9S</meta:editing-duration>
    <dc:date>2026-07-11T12:31:04.594657771</dc:date>
    <meta:generator>LibreOffice/26.2.4.2$Linux_X86_64 LibreOffice_project/64a984c51f4702dbd3710b13428c673a2f1292e7</meta:generator>
    <meta:document-statistic meta:table-count="2" meta:image-count="0" meta:object-count="0" meta:page-count="2" meta:paragraph-count="25" meta:word-count="1202" meta:character-count="6294" meta:non-whitespace-character-count="5115"/>
  </office:meta>
</office:document-meta>
</file>