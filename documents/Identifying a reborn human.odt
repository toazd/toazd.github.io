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style:font-name="Gabriela Nerd Font" officeooo:paragraph-rsid="00135ab0"/>
    </style:style>
    <style:style style:name="P2" style:family="paragraph" style:parent-style-name="Table_20_Contents">
      <style:text-properties style:font-name="Liberation Sans" officeooo:paragraph-rsid="00135ab0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text-properties fo:color="#127622" loext:opacity="100%" style:font-name="Gabriela Nerd Font" officeooo:paragraph-rsid="00245a6f"/>
    </style:style>
    <style:style style:name="P6" style:family="paragraph" style:parent-style-name="Table_20_Contents">
      <style:text-properties style:font-name="Liberation Sans" officeooo:paragraph-rsid="00245a6f"/>
    </style:style>
    <style:style style:name="T1" style:family="text">
      <style:text-properties fo:background-color="#fff5ce" loext:char-shading-value="0"/>
    </style:style>
    <style:style style:name="T2" style:family="text">
      <style:text-properties fo:color="#127622" loext:opacity="100%" style:font-name="Gabriela Nerd Font"/>
    </style:style>
    <style:style style:name="T3" style:family="text">
      <style:text-properties style:text-position="33% 80%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style="italic"/>
    </style:style>
    <style:style style:name="T6" style:family="text">
      <style:text-properties fo:color="#ff0000" loext:opacity="100%" fo:background-color="#fff5ce" loext:char-shading-value="0"/>
    </style:style>
    <style:style style:name="T7" style:family="text">
      <style:text-properties fo:color="#ff0000" loext:opacity="100%" fo:font-style="italic" fo:background-color="#fff5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1 Corinthians 12:3</text:p>
            <text:p text:style-name="P2">Wherefore I give you to understand, that no man speaking by the Spirit of God calleth Jesus accursed: and that <text:span text:style-name="T1">no man can say that Jesus is the Lord, but by the Holy Ghost</text:span>.</text:p>
          </table:table-cell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1 John 4:15</text:p>
            <text:p text:style-name="P2">Whosoever shall confess that Jesus is the Son of God, God dwelleth in him, and he in God.</text:p>
          </table:table-cell>
        </table:table-row>
      </table:table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2">John 8:42-47</text:span><text:line-break/><text:span text:style-name="T3">42</text:span> Jesus said unto them, <text:span text:style-name="T4">If God were your Father, ye would love me: for I proceeded forth and came from God; neither came I of myself, but he sent me.</text:span><text:line-break/><text:span text:style-name="T3">43</text:span> <text:span text:style-name="T4">Why do ye not understand my speech? </text:span><text:span text:style-name="T5">even</text:span><text:span text:style-name="T4"> because </text:span><text:span text:style-name="T6">ye cannot hear my word</text:span><text:span text:style-name="T4">.</text:span><text:line-break/><text:span text:style-name="T3">44</text:span> <text:span text:style-name="T4">Ye are of </text:span><text:span text:style-name="T5">your</text:span><text:span text:style-name="T4"> father the devil, and the </text:span><text:span text:style-name="T6">lusts of your father ye will do</text:span><text:span text:style-name="T4">. He was a </text:span><text:span text:style-name="T6">murderer</text:span><text:span text:style-name="T4"> from the beginning, and abode not in the truth, because </text:span><text:span text:style-name="T6">there is no truth in him</text:span><text:span text:style-name="T4">. When he speaketh a lie, he speaketh of his own: for he </text:span><text:span text:style-name="T6">is a liar</text:span><text:span text:style-name="T4">, and the father of it.</text:span><text:line-break/><text:span text:style-name="T3">45</text:span> <text:span text:style-name="T4">And because I tell </text:span><text:span text:style-name="T5">you</text:span><text:span text:style-name="T4"> the truth, </text:span><text:span text:style-name="T6">ye believe me not</text:span><text:span text:style-name="T4">.</text:span><text:line-break/><text:span text:style-name="T3">46</text:span> <text:span text:style-name="T4">Which of you convinceth me of sin? And if I say the truth, why do ye not believe me?</text:span><text:line-break/><text:span text:style-name="T3">47</text:span> <text:span text:style-name="T6">He that is of God heareth God's words</text:span><text:span text:style-name="T4">: </text:span><text:span text:style-name="T6">ye therefore hear </text:span><text:span text:style-name="T7">them</text:span><text:span text:style-name="T6"> not, because ye are not of God</text:span><text:span text:style-name="T4">.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1 Corinthians 2:14</text:p>
            <text:p text:style-name="P6">But the natural man receiveth not the things of the Spirit of God: for they are foolishness unto him: neither can he know them, because they are spiritually discerned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80008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1T08:20:27.047000000</meta:creation-date>
    <dc:date>2026-07-11T12:30:12.348797995</dc:date>
    <meta:editing-duration>PT13H21M52S</meta:editing-duration>
    <meta:editing-cycles>15</meta:editing-cycles>
    <meta:generator>LibreOffice/26.2.4.2$Linux_X86_64 LibreOffice_project/64a984c51f4702dbd3710b13428c673a2f1292e7</meta:generator>
    <meta:document-statistic meta:table-count="4" meta:image-count="0" meta:object-count="0" meta:page-count="1" meta:paragraph-count="7" meta:word-count="247" meta:character-count="1220" meta:non-whitespace-character-count="980"/>
  </office:meta>
</office:document-meta>
</file>