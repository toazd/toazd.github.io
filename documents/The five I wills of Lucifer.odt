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4.7264in" style:rel-column-width="39206*"/>
    </style:style>
    <style:style style:name="Table1.B" style:family="table-column">
      <style:table-column-properties style:column-width="0.4847in" style:rel-column-width="4020*"/>
    </style:style>
    <style:style style:name="Table1.C" style:family="table-column">
      <style:table-column-properties style:column-width="2.6896in" style:rel-column-width="22309*"/>
    </style:style>
    <style:style style:name="Table1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.C1" style:family="table-cell">
      <style:table-cell-properties fo:padding="0.0382in" fo:border="0.75pt solid #000000"/>
    </style:style>
    <style:style style:name="Table1.C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.A3" style:family="table-cell">
      <style:table-cell-properties fo:padding="0.0382in" fo:border-left="0.75pt solid #000000" fo:border-right="none" fo:border-top="none" fo:border-bottom="0.75pt solid #000000"/>
    </style:style>
    <style:style style:name="Table1.B3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.A4" style:family="table-cell">
      <style:table-cell-properties fo:padding="0.0382in" fo:border-left="0.75pt solid #000000" fo:border-right="none" fo:border-top="none" fo:border-bottom="0.75pt solid #000000"/>
    </style:style>
    <style:style style:name="Table1.B4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Standard" style:list-style-name="L1">
      <style:text-properties fo:color="#127622" loext:opacity="100%" officeooo:rsid="001a6450" officeooo:paragraph-rsid="001a6450"/>
    </style:style>
    <style:style style:name="P2" style:family="paragraph" style:parent-style-name="Standard" style:list-style-name="L1"/>
    <style:style style:name="P3" style:family="paragraph" style:parent-style-name="Table_20_Contents">
      <style:text-properties officeooo:paragraph-rsid="0013460e"/>
    </style:style>
    <style:style style:name="P4" style:family="paragraph" style:parent-style-name="Table_20_Contents">
      <style:text-properties fo:color="#127622" loext:opacity="100%" officeooo:paragraph-rsid="0013b7c4"/>
    </style:style>
    <style:style style:name="P5" style:family="paragraph" style:parent-style-name="Table_20_Contents">
      <style:text-properties officeooo:paragraph-rsid="0013b7c4"/>
    </style:style>
    <style:style style:name="P6" style:family="paragraph" style:parent-style-name="Table_20_Contents">
      <style:text-properties officeooo:paragraph-rsid="001663ae"/>
    </style:style>
    <style:style style:name="P7" style:family="paragraph" style:parent-style-name="Table_20_Contents">
      <style:text-properties fo:color="#127622" loext:opacity="100%" officeooo:paragraph-rsid="001903ba"/>
    </style:style>
    <style:style style:name="P8" style:family="paragraph" style:parent-style-name="Table_20_Contents">
      <style:text-properties officeooo:paragraph-rsid="001903ba"/>
    </style:style>
    <style:style style:name="T1" style:family="text">
      <style:text-properties style:text-position="super 58%"/>
    </style:style>
    <style:style style:name="T2" style:family="text">
      <style:text-properties fo:color="#127622" loext:opacity="100%"/>
    </style:style>
    <style:style style:name="T3" style:family="text">
      <style:text-properties style:text-position="33% 80%"/>
    </style:style>
    <style:style style:name="T4" style:family="text">
      <style:text-properties fo:background-color="#ffffd7" loext:char-shading-value="0"/>
    </style:style>
    <style:style style:name="T5" style:family="text">
      <style:text-properties officeooo:rsid="0015ab21"/>
    </style:style>
    <style:style style:name="T6" style:family="text">
      <style:text-properties fo:background-color="#ffdbb6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list text:style-name="L1">
        <text:list-item>
          <text:p text:style-name="P1">Isaiah 14:13,14</text:p>
          <text:list>
            <text:list-item>
              <text:p text:style-name="P2">I will ascend<text:span text:style-name="T1">H5927 H8799</text:span> into heaven<text:span text:style-name="T1">H8064</text:span></text:p>
            </text:list-item>
            <text:list-item>
              <text:p text:style-name="P2">I will exalt<text:span text:style-name="T1">H7311 H8686</text:span> my throne<text:span text:style-name="T1">H3678</text:span> above<text:span text:style-name="T1">H4605</text:span> the stars<text:span text:style-name="T1">H3556</text:span> of God<text:span text:style-name="T1">H410</text:span></text:p>
            </text:list-item>
            <text:list-item>
              <text:p text:style-name="P2">I will sit<text:span text:style-name="T1">H3427</text:span> <text:span text:style-name="T1">H8799</text:span> also upon the mount<text:span text:style-name="T1">H2022</text:span> of the congregation<text:span text:style-name="T1">H4150</text:span>, in the sides<text:span text:style-name="T1">H3411</text:span> of the north<text:span text:style-name="T1">H6828</text:span></text:p>
            </text:list-item>
            <text:list-item>
              <text:p text:style-name="P2">I will ascend<text:span text:style-name="T1">H5927 H8799</text:span> above the heights<text:span text:style-name="T1">H1116</text:span> of the clouds<text:span text:style-name="T1">H5645</text:span></text:p>
            </text:list-item>
            <text:list-item>
              <text:p text:style-name="P2">I will be like<text:span text:style-name="T1">H1819 H8691</text:span> the most High<text:span text:style-name="T1">H5945</text:span>.</text:p>
            </text:list-item>
          </text:list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table:number-columns-spanned="2" office:value-type="string">
            <text:p text:style-name="P3"><text:span text:style-name="T2">2 Corinthians 11:13-15</text:span><text:line-break/><text:span text:style-name="T3">13</text:span> For such are false apostles, deceitful workers, <text:span text:style-name="T4">transforming themselves into the apostles of Christ</text:span>.</text:p>
            <text:p text:style-name="P3"><text:span text:style-name="T3">14</text:span> And no marvel; for <text:span text:style-name="T4">Satan himself is transformed into an angel of light</text:span>.</text:p>
            <text:p text:style-name="P3"><text:span text:style-name="T3">15</text:span> Therefore it is no great thing if his <text:span text:style-name="T4">ministers also be transformed as the ministers of righteousness</text:span>; whose end shall be according to their works.</text:p>
          </table:table-cell>
          <table:covered-table-cell/>
          <table:table-cell table:style-name="Table1.C1" office:value-type="string">
            <text:p text:style-name="P4">2 Corinthians 2:17<text:span text:style-name="T5">m</text:span></text:p>
            <text:p text:style-name="P5">For we are not as many, which <text:span text:style-name="T4">corrupt the word of God</text:span>: but as of sincerity, but as of God, in the sight of God speak we in Christ.</text:p>
          </table:table-cell>
        </table:table-row>
        <table:table-row>
          <table:covered-table-cell table:style-name="Table1.A1"/>
          <table:covered-table-cell/>
          <table:table-cell table:style-name="Table1.C2" office:value-type="string">
            <text:p text:style-name="P4">2 Corinthians 4:2</text:p>
            <text:p text:style-name="P5">But have renounced the hidden things of <text:span text:style-name="T4">dishonesty</text:span>, not walking in <text:span text:style-name="T4">craftiness</text:span>, nor <text:span text:style-name="T4">handling the word of God deceitfully</text:span>; but by manifestation of the truth commending ourselves to every man's conscience in the sight of God.</text:p>
          </table:table-cell>
        </table:table-row>
        <table:table-row>
          <table:table-cell table:style-name="Table1.A3" table:number-rows-spanned="2" office:value-type="string">
            <text:p text:style-name="P6"><text:span text:style-name="T2">Acts 20:28-31</text:span><text:line-break/><text:span text:style-name="T3">28</text:span> Take heed therefore unto yourselves, and to all the flock, over the which the Holy Ghost hath made you overseers, to <text:span text:style-name="T4">feed the church of God</text:span>, which he hath purchased with his own blood.</text:p>
            <text:p text:style-name="P6"><text:span text:style-name="T3">29</text:span> For I know this, that after my departing shall <text:span text:style-name="T4">grievous wolves enter in among you</text:span>, not sparing the flock.</text:p>
            <text:p text:style-name="P6"><text:span text:style-name="T3">30</text:span> Also <text:span text:style-name="T4">of your own selves shall men arise, speaking perverse things</text:span>, to <text:span text:style-name="T6">draw away disciples after them</text:span>.</text:p>
            <text:p text:style-name="P6"><text:span text:style-name="T3">31</text:span> Therefore watch, and remember, that by the space of three years I ceased not to warn every one night and day with tears.</text:p>
          </table:table-cell>
          <table:table-cell table:style-name="Table1.B3" table:number-columns-spanned="2" office:value-type="string">
            <text:p text:style-name="P6"><text:span text:style-name="T2">1 Cor 11:19</text:span><text:line-break/>For <text:span text:style-name="T4">there must be also heresies among you</text:span>, that they which are approved may be made manifest among you.</text:p>
          </table:table-cell>
          <table:covered-table-cell/>
        </table:table-row>
        <table:table-row>
          <table:covered-table-cell table:style-name="Table1.A3"/>
          <table:table-cell table:style-name="Table1.B4" table:number-columns-spanned="2" office:value-type="string">
            <text:p text:style-name="P7">Romans 16:17-18</text:p>
            <text:p text:style-name="P8"><text:span text:style-name="T3">17</text:span> Now I beseech you, brethren, mark them which <text:span text:style-name="T4">cause divisions and offences contrary to the doctrine which ye have learned</text:span>; and avoid them.</text:p>
            <text:p text:style-name="P8"><text:span text:style-name="T3">18</text:span> For <text:span text:style-name="T6">they that are such serve</text:span> not our Lord Jesus Christ, but <text:span text:style-name="T6">their own belly</text:span>; and by good words and fair speeches deceive the hearts of the simple.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08:03:47.453137000</meta:creation-date>
    <dc:title>default</dc:title>
    <meta:editing-duration>PT4H56M37S</meta:editing-duration>
    <meta:editing-cycles>16</meta:editing-cycles>
    <meta:generator>LibreOffice/26.2.4.2$Linux_X86_64 LibreOffice_project/64a984c51f4702dbd3710b13428c673a2f1292e7</meta:generator>
    <meta:initial-creator>William K. McDannell Jr.</meta:initial-creator>
    <dc:date>2026-07-11T12:30:36.801548489</dc:date>
    <meta:document-statistic meta:table-count="1" meta:image-count="0" meta:object-count="0" meta:page-count="1" meta:paragraph-count="21" meta:word-count="365" meta:character-count="2049" meta:non-whitespace-character-count="1711"/>
    <meta:template xlink:type="simple" xlink:actuate="onRequest" xlink:title="default" xlink:href="../../../../AppData/Roaming/LibreOffice/4/user/template/default.ott" meta:date="2025-09-14T08:03:46.395767200"/>
  </office:meta>
</office:document-meta>
</file>