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F00000421E51358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ackChancery" svg:font-family="BlackChancery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2" style:family="table">
      <style:table-properties style:width="7.9in" table:align="margins"/>
    </style:style>
    <style:style style:name="Table12.A" style:family="table-column">
      <style:table-column-properties style:column-width="7.9in" style:rel-column-width="65535*"/>
    </style:style>
    <style:style style:name="Table12.1" style:family="table-row">
      <style:table-row-properties style:min-row-height="4.471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7.9in" style:rel-column-width="65535*"/>
    </style:style>
    <style:style style:name="Table6.A1" style:family="table-cell">
      <style:table-cell-properties fo:padding="0.0382in" fo:border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7.9in" style:rel-column-width="65535*"/>
    </style:style>
    <style:style style:name="Table4.A1" style:family="table-cell">
      <style:table-cell-properties fo:padding="0.0382in" fo:border="0.7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7.9in" style:rel-column-width="65535*"/>
    </style:style>
    <style:style style:name="Table2.A1" style:family="table-cell">
      <style:table-cell-properties fo:padding="0.0382in" fo:border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7.9in" style:rel-column-width="65535*"/>
    </style:style>
    <style:style style:name="Table7.A1" style:family="table-cell">
      <style:table-cell-properties fo:padding="0.0382in" fo:border="0.7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7.9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7.9in" table:align="margins"/>
    </style:style>
    <style:style style:name="Table11.A" style:family="table-column">
      <style:table-column-properties style:column-width="7.9in" style:rel-column-width="65535*"/>
    </style:style>
    <style:style style:name="Table11.A1" style:family="table-cell">
      <style:table-cell-properties fo:padding="0.0382in" fo:border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2.6333in" style:rel-column-width="2184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BlackChancery" fo:font-size="14pt" fo:font-weight="bold" officeooo:rsid="003d1d1d" officeooo:paragraph-rsid="003d1d1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 style:list-style-name="L1">
      <style:paragraph-properties fo:text-align="left" style:justify-single-word="false"/>
      <style:text-properties style:font-name="Liberation Sans" officeooo:paragraph-rsid="003d1d1d"/>
    </style:style>
    <style:style style:name="P4" style:family="paragraph" style:parent-style-name="Standard" style:list-style-name="L1">
      <style:paragraph-properties fo:text-align="left" style:justify-single-word="false"/>
      <style:text-properties style:font-name="Liberation Sans" officeooo:rsid="00409dbc" officeooo:paragraph-rsid="00409dbc"/>
    </style:style>
    <style:style style:name="P5" style:family="paragraph" style:parent-style-name="Standard">
      <style:paragraph-properties fo:text-align="left" style:justify-single-word="false"/>
      <style:text-properties officeooo:paragraph-rsid="00409dbc"/>
    </style:style>
    <style:style style:name="P6" style:family="paragraph" style:parent-style-name="Table_20_Contents">
      <style:paragraph-properties fo:text-align="left" style:justify-single-word="false"/>
    </style:style>
    <style:style style:name="P7" style:family="paragraph" style:parent-style-name="Table_20_Contents">
      <style:paragraph-properties fo:text-align="left" style:justify-single-word="false"/>
      <style:text-properties style:font-name="Liberation Sans"/>
    </style:style>
    <style:style style:name="P8" style:family="paragraph" style:parent-style-name="Standard" style:list-style-name="L2">
      <style:paragraph-properties fo:text-align="left" style:justify-single-word="false"/>
      <style:text-properties style:font-name="Liberation Sans" officeooo:rsid="002a97a8" officeooo:paragraph-rsid="002a97a8"/>
    </style:style>
    <style:style style:name="P9" style:family="paragraph" style:parent-style-name="Standard" style:list-style-name="L2">
      <style:paragraph-properties fo:text-align="left" style:justify-single-word="false"/>
      <style:text-properties officeooo:paragraph-rsid="008c06c9"/>
    </style:style>
    <style:style style:name="P10" style:family="paragraph" style:parent-style-name="Standard">
      <style:text-properties style:font-name="Liberation Sans" officeooo:rsid="004e2e36" officeooo:paragraph-rsid="004e2e36"/>
    </style:style>
    <style:style style:name="P11" style:family="paragraph" style:parent-style-name="Standard" style:list-style-name="L3">
      <style:text-properties officeooo:paragraph-rsid="005000f2"/>
    </style:style>
    <style:style style:name="P12" style:family="paragraph" style:parent-style-name="Standard" style:list-style-name="L3">
      <style:text-properties officeooo:paragraph-rsid="0050f9c4"/>
    </style:style>
    <style:style style:name="P13" style:family="paragraph" style:parent-style-name="Standard" style:list-style-name="L3">
      <style:text-properties officeooo:paragraph-rsid="005291a6"/>
    </style:style>
    <style:style style:name="P14" style:family="paragraph" style:parent-style-name="Standard" style:list-style-name="L3">
      <style:text-properties officeooo:paragraph-rsid="0052da07"/>
    </style:style>
    <style:style style:name="P15" style:family="paragraph" style:parent-style-name="Standard" style:list-style-name="L3">
      <style:text-properties officeooo:paragraph-rsid="005428fd"/>
    </style:style>
    <style:style style:name="P16" style:family="paragraph" style:parent-style-name="Standard">
      <style:text-properties style:font-name="Liberation Sans" officeooo:rsid="005428fd" officeooo:paragraph-rsid="005428fd"/>
    </style:style>
    <style:style style:name="P17" style:family="paragraph" style:parent-style-name="Standard">
      <style:paragraph-properties fo:text-align="center" style:justify-single-word="false"/>
      <style:text-properties style:font-name="Liberation Sans" officeooo:rsid="0095db86" officeooo:paragraph-rsid="0095db86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5531c0" officeooo:paragraph-rsid="0058f294"/>
    </style:style>
    <style:style style:name="P19" style:family="paragraph" style:parent-style-name="Table_20_Contents">
      <style:paragraph-properties fo:text-align="left" style:justify-single-word="false"/>
      <style:text-properties style:font-name="Liberation Sans" fo:font-weight="normal" officeooo:paragraph-rsid="00a58f16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paragraph-rsid="00a58f16"/>
    </style:style>
    <style:style style:name="P21" style:family="paragraph" style:parent-style-name="Table_20_Contents">
      <style:text-properties style:font-name="Liberation Sans" officeooo:paragraph-rsid="00920237"/>
    </style:style>
    <style:style style:name="P22" style:family="paragraph" style:parent-style-name="Table_20_Contents">
      <style:text-properties style:font-name="Liberation Sans" officeooo:paragraph-rsid="005b6628"/>
    </style:style>
    <style:style style:name="P23" style:family="paragraph" style:parent-style-name="Table_20_Contents">
      <style:paragraph-properties fo:text-align="left" style:justify-single-word="false"/>
      <style:text-properties style:font-name="Liberation Sans" officeooo:paragraph-rsid="00a58f16"/>
    </style:style>
    <style:style style:name="P24" style:family="paragraph" style:parent-style-name="Standard">
      <style:text-properties style:font-name="Liberation Sans" officeooo:rsid="005428fd" officeooo:paragraph-rsid="005b6628"/>
    </style:style>
    <style:style style:name="P25" style:family="paragraph" style:parent-style-name="Table_20_Contents">
      <style:paragraph-properties fo:text-align="left" style:justify-single-word="false"/>
      <style:text-properties style:font-name="Liberation Sans" officeooo:paragraph-rsid="00a44dee"/>
    </style:style>
    <style:style style:name="P26" style:family="paragraph" style:parent-style-name="Table_20_Contents">
      <style:paragraph-properties fo:text-align="left" style:justify-single-word="false"/>
      <style:text-properties style:font-name="Liberation Sans" fo:font-weight="bold" officeooo:paragraph-rsid="00a44dee" style:font-weight-asian="bold" style:font-weight-complex="bold"/>
    </style:style>
    <style:style style:name="P27" style:family="paragraph" style:parent-style-name="Standard">
      <style:paragraph-properties fo:text-align="left" style:justify-single-word="false"/>
      <style:text-properties style:font-name="Liberation Sans" officeooo:rsid="005428fd" officeooo:paragraph-rsid="005531c0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BlackChancery"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left" style:justify-single-word="false"/>
      <style:text-properties fo:color="#127622" loext:opacity="100%" style:font-name="Gabriela Nerd Font" fo:font-style="normal" officeooo:rsid="00409dbc" officeooo:paragraph-rsid="00409dbc" style:font-style-asian="normal" style:font-style-complex="normal"/>
    </style:style>
    <style:style style:name="P30" style:family="paragraph" style:parent-style-name="Standard">
      <style:text-properties style:font-name="Liberation Sans"/>
    </style:style>
    <style:style style:name="P31" style:family="paragraph" style:parent-style-name="Standard" style:list-style-name="L4">
      <style:text-properties style:font-name="Liberation Sans" officeooo:rsid="0033b790" officeooo:paragraph-rsid="003ada04"/>
    </style:style>
    <style:style style:name="P32" style:family="paragraph" style:parent-style-name="Standard" style:list-style-name="L4">
      <style:text-properties style:font-name="Liberation Sans" officeooo:rsid="003955ac" officeooo:paragraph-rsid="003955ac"/>
    </style:style>
    <style:style style:name="P33" style:family="paragraph" style:parent-style-name="Standard">
      <style:text-properties style:font-name="Liberation Sans" officeooo:paragraph-rsid="001ab418"/>
    </style:style>
    <style:style style:name="P34" style:family="paragraph" style:parent-style-name="Standard">
      <style:paragraph-properties fo:text-align="center" style:justify-single-word="false"/>
      <style:text-properties style:font-name="BlackChancery" fo:font-size="14pt" fo:font-weight="bold" officeooo:rsid="0033b790" officeooo:paragraph-rsid="0033b790" style:font-size-asian="14pt" style:font-weight-asian="bold" style:font-size-complex="14pt" style:font-weight-complex="bold"/>
    </style:style>
    <style:style style:name="P35" style:family="paragraph" style:parent-style-name="Table_20_Contents">
      <style:text-properties officeooo:paragraph-rsid="0033b790"/>
    </style:style>
    <style:style style:name="P36" style:family="paragraph" style:parent-style-name="Table_20_Contents">
      <style:text-properties style:font-name="Liberation Sans" officeooo:paragraph-rsid="0033b790"/>
    </style:style>
    <style:style style:name="P37" style:family="paragraph" style:parent-style-name="Standard">
      <style:text-properties style:font-name="Liberation Sans" officeooo:rsid="0021070f" officeooo:paragraph-rsid="001ab418"/>
    </style:style>
    <style:style style:name="P38" style:family="paragraph" style:parent-style-name="Standard">
      <style:paragraph-properties fo:text-align="center" style:justify-single-word="false"/>
      <style:text-properties style:font-name="BlackChancery" fo:font-size="14pt" fo:font-weight="bold" officeooo:rsid="00354772" officeooo:paragraph-rsid="00354772" style:font-size-asian="14pt" style:font-weight-asian="bold" style:font-size-complex="14pt" style:font-weight-complex="bold"/>
    </style:style>
    <style:style style:name="P39" style:family="paragraph" style:parent-style-name="Standard" style:list-style-name="L5">
      <style:text-properties officeooo:paragraph-rsid="00470fc4"/>
    </style:style>
    <style:style style:name="P40" style:family="paragraph" style:parent-style-name="Standard" style:list-style-name="L5">
      <style:text-properties officeooo:paragraph-rsid="007d22b9"/>
    </style:style>
    <style:style style:name="P41" style:family="paragraph" style:parent-style-name="Standard">
      <style:paragraph-properties fo:text-align="center" style:justify-single-word="false"/>
      <style:text-properties style:font-name="Liberation Sans" officeooo:rsid="006b81c6" officeooo:paragraph-rsid="006b81c6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tyle="normal" fo:font-weight="bold" officeooo:rsid="006b81c6" officeooo:paragraph-rsid="006b81c6" style:font-style-asian="normal" style:font-weight-asian="bold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officeooo:rsid="007280ab" officeooo:paragraph-rsid="007280ab"/>
    </style:style>
    <style:style style:name="P44" style:family="paragraph" style:parent-style-name="Table_20_Contents">
      <style:text-properties style:font-name="Liberation Sans" officeooo:rsid="006b81c6" officeooo:paragraph-rsid="006b81c6"/>
    </style:style>
    <style:style style:name="P45" style:family="paragraph" style:parent-style-name="Table_20_Contents">
      <style:text-properties style:font-name="Liberation Sans" officeooo:rsid="006b81c6" officeooo:paragraph-rsid="00839aec"/>
    </style:style>
    <style:style style:name="P46" style:family="paragraph" style:parent-style-name="Table_20_Contents">
      <style:text-properties style:font-name="Liberation Sans" officeooo:rsid="00781b81" officeooo:paragraph-rsid="00781b81"/>
    </style:style>
    <style:style style:name="P47" style:family="paragraph" style:parent-style-name="Table_20_Contents">
      <style:text-properties style:font-name="Liberation Sans" officeooo:rsid="007bbb8c" officeooo:paragraph-rsid="007bbb8c"/>
    </style:style>
    <style:style style:name="P48" style:family="paragraph" style:parent-style-name="Text_20_body">
      <style:text-properties style:font-name="Liberation Sans"/>
    </style:style>
    <style:style style:name="T1" style:family="text">
      <style:text-properties officeooo:rsid="00b46b8a"/>
    </style:style>
    <style:style style:name="T2" style:family="text">
      <style:text-properties officeooo:rsid="00a2d198"/>
    </style:style>
    <style:style style:name="T3" style:family="text">
      <style:text-properties fo:color="#127622" loext:opacity="100%" style:font-name="Gabriela Nerd Font" officeooo:rsid="00a2d198"/>
    </style:style>
    <style:style style:name="T4" style:family="text">
      <style:text-properties fo:color="#127622" loext:opacity="100%" style:font-name="Gabriela Nerd Font" officeooo:rsid="00b22b21"/>
    </style:style>
    <style:style style:name="T5" style:family="text">
      <style:text-properties officeooo:rsid="00aa1655"/>
    </style:style>
    <style:style style:name="T6" style:family="text">
      <style:text-properties officeooo:rsid="003d1d1d"/>
    </style:style>
    <style:style style:name="T7" style:family="text">
      <style:text-properties officeooo:rsid="00409dbc"/>
    </style:style>
    <style:style style:name="T8" style:family="text">
      <style:text-properties officeooo:rsid="0041e8ea"/>
    </style:style>
    <style:style style:name="T9" style:family="text">
      <style:text-properties officeooo:rsid="00a1f660"/>
    </style:style>
    <style:style style:name="T10" style:family="text">
      <style:text-properties officeooo:rsid="00a38856"/>
    </style:style>
    <style:style style:name="T11" style:family="text">
      <style:text-properties officeooo:rsid="0042bca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127622" loext:opacity="100%" style:font-name="Gabriela Nerd Font" fo:font-style="normal" style:font-style-asian="normal" style:font-style-complex="normal"/>
    </style:style>
    <style:style style:name="T15" style:family="text">
      <style:text-properties fo:color="#127622" loext:opacity="100%" style:font-name="Gabriela Nerd Font" fo:font-style="normal" officeooo:rsid="00b22b21" style:font-style-asian="normal" style:font-style-complex="normal"/>
    </style:style>
    <style:style style:name="T16" style:family="text">
      <style:text-properties fo:font-style="normal" officeooo:rsid="00409eab" style:font-style-asian="normal" style:font-style-complex="normal"/>
    </style:style>
    <style:style style:name="T17" style:family="text">
      <style:text-properties fo:font-style="normal" officeooo:rsid="005dffec" style:font-style-asian="normal" style:font-style-complex="normal"/>
    </style:style>
    <style:style style:name="T18" style:family="text">
      <style:text-properties fo:color="#127622" loext:opacity="100%" style:font-name="Gabriela Nerd Font" fo:font-style="normal" officeooo:rsid="00409dbc" style:font-style-asian="normal" style:font-style-complex="normal"/>
    </style:style>
    <style:style style:name="T19" style:family="text">
      <style:text-properties style:font-name="Liberation Sans"/>
    </style:style>
    <style:style style:name="T20" style:family="text">
      <style:text-properties style:text-position="33% 80%" style:font-name="Liberation Sans"/>
    </style:style>
    <style:style style:name="T21" style:family="text">
      <style:text-properties officeooo:rsid="0097e1b3"/>
    </style:style>
    <style:style style:name="T22" style:family="text">
      <style:text-properties officeooo:rsid="00989944"/>
    </style:style>
    <style:style style:name="T23" style:family="text">
      <style:text-properties style:font-name="Liberation Sans" officeooo:rsid="008c06c9"/>
    </style:style>
    <style:style style:name="T24" style:family="text">
      <style:text-properties style:font-name="Liberation Sans" officeooo:rsid="009a03bb"/>
    </style:style>
    <style:style style:name="T25" style:family="text">
      <style:text-properties fo:color="#127622" loext:opacity="100%" style:font-name="Gabriela Nerd Font" fo:font-style="normal" officeooo:rsid="00b840fd" style:font-style-asian="normal" style:font-style-complex="normal"/>
    </style:style>
    <style:style style:name="T26" style:family="text">
      <style:text-properties officeooo:rsid="0057425e"/>
    </style:style>
    <style:style style:name="T27" style:family="text">
      <style:text-properties officeooo:rsid="005000f2"/>
    </style:style>
    <style:style style:name="T28" style:family="text">
      <style:text-properties officeooo:rsid="005428fd"/>
    </style:style>
    <style:style style:name="T29" style:family="text">
      <style:text-properties officeooo:rsid="0093c837"/>
    </style:style>
    <style:style style:name="T30" style:family="text">
      <style:text-properties officeooo:rsid="00942ac8"/>
    </style:style>
    <style:style style:name="T31" style:family="text">
      <style:text-properties style:font-name="Liberation Sans" officeooo:rsid="0052da07"/>
    </style:style>
    <style:style style:name="T32" style:family="text">
      <style:text-properties style:font-name="Liberation Sans" officeooo:rsid="005000f2"/>
    </style:style>
    <style:style style:name="T33" style:family="text">
      <style:text-properties style:font-name="Liberation Sans" officeooo:rsid="0050f9c4"/>
    </style:style>
    <style:style style:name="T34" style:family="text">
      <style:text-properties style:font-name="Liberation Sans" fo:font-style="normal" officeooo:rsid="00409eab" style:font-style-asian="normal" style:font-style-complex="normal"/>
    </style:style>
    <style:style style:name="T35" style:family="text">
      <style:text-properties style:font-name="Liberation Sans" fo:font-style="normal" officeooo:rsid="005291a6" style:font-style-asian="normal" style:font-style-complex="normal"/>
    </style:style>
    <style:style style:name="T36" style:family="text">
      <style:text-properties style:font-name="Liberation Sans" fo:font-style="normal" officeooo:rsid="0052da07" style:font-style-asian="normal" style:font-style-complex="normal"/>
    </style:style>
    <style:style style:name="T37" style:family="text">
      <style:text-properties style:font-name="Liberation Sans" fo:font-style="normal" officeooo:rsid="005428fd" style:font-style-asian="normal" style:font-style-complex="normal"/>
    </style:style>
    <style:style style:name="T38" style:family="text">
      <style:text-properties fo:font-style="normal" officeooo:rsid="0096d9e2" style:font-style-asian="normal" style:font-style-complex="normal"/>
    </style:style>
    <style:style style:name="T39" style:family="text">
      <style:text-properties officeooo:rsid="0058f29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font-name="Liberation Sans" fo:background-color="#ffff00" loext:char-shading-value="0"/>
    </style:style>
    <style:style style:name="T42" style:family="text">
      <style:text-properties style:font-name="Liberation Sans" fo:background-color="#fff5ce" loext:char-shading-value="0"/>
    </style:style>
    <style:style style:name="T43" style:family="text">
      <style:text-properties style:font-name="Liberation Sans" fo:background-color="transparent" loext:char-shading-value="0"/>
    </style:style>
    <style:style style:name="T44" style:family="text">
      <style:text-properties style:text-position="33% 80%"/>
    </style:style>
    <style:style style:name="T45" style:family="text">
      <style:text-properties fo:background-color="#fff5ce" loext:char-shading-value="0"/>
    </style:style>
    <style:style style:name="T46" style:family="text">
      <style:text-properties fo:background-color="transparent" loext:char-shading-value="0"/>
    </style:style>
    <style:style style:name="T47" style:family="text">
      <style:text-properties fo:background-color="#ffff00" loext:char-shading-value="0"/>
    </style:style>
    <style:style style:name="T48" style:family="text">
      <style:text-properties fo:background-color="#ffbf00" loext:char-shading-value="0"/>
    </style:style>
    <style:style style:name="T49" style:family="text">
      <style:text-properties officeooo:rsid="006287fa"/>
    </style:style>
    <style:style style:name="T50" style:family="text">
      <style:text-properties style:font-name="Liberation Sans" fo:background-color="#ffbf00" loext:char-shading-value="0"/>
    </style:style>
    <style:style style:name="T51" style:family="text">
      <style:text-properties style:font-name="Liberation Sans" officeooo:rsid="00470fc4"/>
    </style:style>
    <style:style style:name="T52" style:family="text">
      <style:text-properties style:font-name="Liberation Sans" officeooo:rsid="00642753"/>
    </style:style>
    <style:style style:name="T53" style:family="text">
      <style:text-properties style:font-name="Liberation Sans" fo:font-style="italic" officeooo:rsid="00642753" style:font-style-asian="italic" style:font-style-complex="italic"/>
    </style:style>
    <style:style style:name="T54" style:family="text">
      <style:text-properties style:font-name="Liberation Sans" officeooo:rsid="007d22b9"/>
    </style:style>
    <style:style style:name="T55" style:family="text">
      <style:text-properties style:font-name="Liberation Sans" officeooo:rsid="00871f5d"/>
    </style:style>
    <style:style style:name="T56" style:family="text">
      <style:text-properties style:font-name="Liberation Sans" officeooo:rsid="0080349b"/>
    </style:style>
    <style:style style:name="T57" style:family="text">
      <style:text-properties style:font-name="Liberation Sans" officeooo:rsid="00806b05"/>
    </style:style>
    <style:style style:name="T58" style:family="text">
      <style:text-properties fo:font-style="normal" fo:font-weight="bold" officeooo:rsid="00642753" style:font-style-asian="normal" style:font-weight-asian="bold" style:font-style-complex="normal" style:font-weight-complex="bold"/>
    </style:style>
    <style:style style:name="T59" style:family="text">
      <style:text-properties officeooo:rsid="0082479a"/>
    </style:style>
    <style:style style:name="T60" style:family="text">
      <style:text-properties officeooo:rsid="007458d7"/>
    </style:style>
    <style:style style:name="T61" style:family="text">
      <style:text-properties officeooo:rsid="007b3ada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51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setting of Jotha<text:span text:style-name="T1">m</text:span>’s parable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"><draw:frame draw:style-name="fr1" draw:name="Image1" text:anchor-type="paragraph" svg:width="7.8236in" style:rel-width="100%" svg:height="6.1598in" style:rel-height="scale" draw:z-index="0"><draw:image xlink:href="Pictures/100000010000053F00000421E5135833.png" xlink:type="simple" xlink:show="embed" xlink:actuate="onLoad" draw:mime-type="image/png"/></draw:frame><text:span text:style-name="T2">The precise location of the city of Ophrah in </text:span><text:span text:style-name="T3">J</text:span><text:span text:style-name="T4">u</text:span><text:span text:style-name="T3">dg</text:span><text:span text:style-name="T4">es</text:span><text:span text:style-name="T3"> 6-9</text:span><text:span text:style-name="T2"> is uncertain. </text:span>For more <text:span text:style-name="T2">information </text:span>on the <text:span text:style-name="T5">two </text:span>cities of Ophrah mentioned in the Bible see <text:a xlink:type="simple" xlink:href="http://www.jewishvirtuallibrary.org/ophrah" text:style-name="Internet_20_link" text:visited-style-name="Visited_20_Internet_20_Link">www.jewishvirtuallibrary.org/ophrah</text:a></text:p>
          </table:table-cell>
        </table:table-row>
      </table:table>
      <text:list text:style-name="L1">
        <text:list-item>
          <text:p text:style-name="P3"><text:span text:style-name="T6">The city of Shechem was in the valley between </text:span><text:span text:style-name="T7">Mount Ebal &amp; Mount Gerizim </text:span><text:span text:style-name="T8">(~0.7-1 mile span from </text:span><text:span text:style-name="T9">one </text:span><text:span text:style-name="T8">mount to the other).</text:span></text:p>
          <text:list>
            <text:list-item>
              <text:p text:style-name="P4">If you’ve never spoken <text:span text:style-name="T10">or listened </text:span>from such a position, on a quiet day it is possible to hear someone speaking <text:span text:style-name="T11">at </text:span>normal <text:span text:style-name="T11">volume</text:span> from one side of a valley to the other.</text:p>
            </text:list-item>
          </text:list>
        </text:list-item>
        <text:list-item>
          <text:p text:style-name="P4">Jotham <text:span text:style-name="T12">lifted up his voice, and cried</text:span><text:span text:style-name="T13"> (</text:span><text:span text:style-name="T14">J</text:span><text:span text:style-name="T15">u</text:span><text:span text:style-name="T14">dg</text:span><text:span text:style-name="T15">es</text:span><text:span text:style-name="T14"> 9:7c,7d</text:span><text:span text:style-name="T13">). That is, he spoke </text:span><text:span text:style-name="T16">very </text:span><text:span text:style-name="T13">loudly which would make it very easy for anyone in the valley </text:span><text:span text:style-name="T17">below </text:span><text:span text:style-name="T13">to hear hi</text:span><text:span text:style-name="T16">m </text:span><text:span text:style-name="T17">clearly.</text:span></text:p>
        </text:list-item>
      </text:list>
      <text:p text:style-name="P5"><text:span text:style-name="T16"/></text:p>
      <text:p text:style-name="P5"><text:span text:style-name="T16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"><text:span text:style-name="T18">Judges 8:33</text:span><text:span text:style-name="T19"><text:line-break/></text:span><text:span text:style-name="T20">33</text:span><text:span text:style-name="T19"> And it came to pass, as soon as Gideon was dead, that the children of Israel turned again, and went a whoring after Baalim, and made Baal-berith their god.</text:span></text:p>
            <text:p text:style-name="P7"/>
            <text:p text:style-name="P6"><text:span text:style-name="T18">Judges 9:4</text:span><text:span text:style-name="T19"><text:line-break/></text:span><text:span text:style-name="T20">4</text:span><text:span text:style-name="T19"> And they gave him threescore and ten pieces of silver out of the house of Baal-berith, wherewith Abimelech hired vain and light persons, which followed him.</text:span></text:p>
          </table:table-cell>
        </table:table-row>
      </table:table>
      <text:list text:style-name="L2">
        <text:list-item>
          <text:p text:style-name="P8">The <text:span text:style-name="T21">children of Israel forsook God and at Shechem was a house for their </text:span><text:span text:style-name="T22">idol</text:span><text:span text:style-name="T21"> Baal-berith.</text:span></text:p>
        </text:list-item>
        <text:list-item>
          <text:p text:style-name="P9"><text:span text:style-name="T23">They had rejected God and were clearly amenable to having a human king </text:span><text:span text:style-name="T24">(</text:span><text:span text:style-name="T18">J</text:span><text:span text:style-name="T25">u</text:span><text:span text:style-name="T18">dg</text:span><text:span text:style-name="T25">es</text:span><text:span text:style-name="T18"> 9:1-4</text:span><text:span text:style-name="T24">).</text:span></text:p>
        </text:list-item>
      </text:list>
      <text:p text:style-name="P10"><text:soft-page-break/><text:span text:style-name="T26">T</text:span><text:span text:style-name="T27">he Hebrew culture </text:span><text:span text:style-name="T26">is steeped with wisdom which is taught </text:span><text:span text:style-name="T28">i</text:span><text:span text:style-name="T27">n parables and there are many such </text:span><text:span text:style-name="T28">easy to find</text:span><text:span text:style-name="T27"> examples in both Biblical and extra-Biblical sources. </text:span><text:span text:style-name="T29">Here are </text:span><text:span text:style-name="T30">just </text:span><text:span text:style-name="T29">a few that appear in the Bible:</text:span></text:p>
      <text:list text:style-name="L3">
        <text:list-item>
          <text:p text:style-name="P11"><text:span text:style-name="T31">The</text:span><text:span text:style-name="T32"> parable of the ewe lamb (</text:span><text:span text:style-name="T18">2 Samuel 12:1-4</text:span><text:span text:style-name="T32">).</text:span></text:p>
        </text:list-item>
        <text:list-item>
          <text:p text:style-name="P12"><text:span text:style-name="T19">Jehoash’</text:span><text:span text:style-name="T33">s parable (</text:span><text:span text:style-name="T18">2 Kings 14:9,10</text:span><text:span text:style-name="T33">).</text:span></text:p>
        </text:list-item>
        <text:list-item>
          <text:p text:style-name="P13"><text:span text:style-name="T34">T</text:span><text:span text:style-name="T35">he parable of the vineyard (</text:span><text:span text:style-name="T18">Isaiah 5:1-7</text:span><text:span text:style-name="T35">).</text:span></text:p>
        </text:list-item>
        <text:list-item>
          <text:p text:style-name="P14"><text:span text:style-name="T36">The parable of the sluggard (</text:span><text:span text:style-name="T18">Proverbs 20:4</text:span><text:span text:style-name="T36">).</text:span></text:p>
        </text:list-item>
        <text:list-item>
          <text:p text:style-name="P15"><text:span text:style-name="T37">The parables of Jesus in </text:span><text:span text:style-name="T18">Matthew</text:span><text:span text:style-name="T37">, </text:span><text:span text:style-name="T18">Mark</text:span><text:span text:style-name="T37">, &amp; </text:span><text:span text:style-name="T18">Luke</text:span><text:span text:style-name="T37">.</text:span></text:p>
        </text:list-item>
      </text:list>
      <text:p text:style-name="P16"><text:span text:style-name="T13"/></text:p>
      <text:p text:style-name="P16"><text:span text:style-name="T13"/></text:p>
      <text:p text:style-name="P17"><text:span text:style-name="T13">Definitions of </text:span><text:span text:style-name="T38">some </text:span><text:span text:style-name="T13">words used in this document.</text:span></text:p>
      <text:p text:style-name="P18"/>
      <table:table table:name="Table4" table:style-name="Table4">
        <table:table-column table:style-name="Table4.A"/>
        <table:table-row>
          <table:table-cell table:style-name="Table4.A1" office:value-type="string">
            <text:p text:style-name="P19"><text:span text:style-name="T39">Noah </text:span>Webster's American Dictionary of the English Language, abridged, 1828</text:p>
            <text:p text:style-name="P20"><text:span text:style-name="T40"/></text:p>
            <text:p text:style-name="P21"><text:span text:style-name="T40">PAR'ABLE</text:span>, n. [L. parabola; Gr. to throw forward or against, to compare to or against; as in confero, collatum, to set together, or one thing with another.]</text:p>
            <text:p text:style-name="P21"/>
            <text:p text:style-name="P21">A fable or allegorical relation or representation of something real in life or nature, from which a moral is drawn for instruction; such as the parable of the trees choosing a king, Judg 9; the parable of the poor man and his lamb. 2 Sam 12; the parable of the ten virgins, Mat 25.</text:p>
            <text:p text:style-name="P22"/>
            <text:p text:style-name="P22"><text:span text:style-name="T40">PAR'ABLE</text:span>, v.t. To represent by fiction or fable.</text:p>
            <text:p text:style-name="Horizontal_20_Line"/>
            <text:p text:style-name="P23"><text:span text:style-name="T40">HE'BREW</text:span>, n. [Heb. Eber, either a proper name, or a name denoting passage, pilgrimage, or coming from beyond the Euphrates.]</text:p>
            <text:p text:style-name="P23"/>
            <text:p text:style-name="P23">One of the descendants of Eber, or Heber; but particularly, a descendant of Jacob, who was a descendant of Eber; an Israelite; a Jew.</text:p>
            <text:p text:style-name="P23"/>
            <text:p text:style-name="P23"><text:span text:style-name="T40">HE'BREW</text:span>, a. Pertaining to the Hebrews; as the Hebrew language or rites.</text:p>
            <text:p text:style-name="Horizontal_20_Line"/>
            <text:p text:style-name="P23"><text:span text:style-name="T40">HE`ARKEN</text:span>, v.i. h`arken.</text:p>
            <text:p text:style-name="P23"/>
            <text:p text:style-name="P23"><text:span text:style-name="T40">1</text:span>. To listen; to lend the ear; to attend to what is uttered, with eagerness or curiosity.</text:p>
            <text:p text:style-name="P23">The furies hearken, and their snakes uncurl.</text:p>
            <text:p text:style-name="P23"/>
            <text:p text:style-name="P23"><text:span text:style-name="T40">2</text:span>. To attend; to regard; to give heed to what is uttered; to observe or obey.</text:p>
            <text:p text:style-name="P23">Hearken, O Israel, to the statutes and the judgments which I teach you. Deu 4.</text:p>
            <text:p text:style-name="P23"/>
            <text:p text:style-name="P23"><text:span text:style-name="T40">3</text:span>. To listen;; to attend; to grant or comply with.</text:p>
            <text:p text:style-name="P23">Hearken thou to the supplication of thy servant. </text:p>
            <text:p text:style-name="P23">l Kings 8.</text:p>
            <text:p text:style-name="P23"/>
            <text:p text:style-name="P23"><text:span text:style-name="T40">HE`ARKEN</text:span>, v.t. h`arken. To hear by listening. [Little used.] </text:p>
          </table:table-cell>
        </table:table-row>
      </table:table>
      <text:p text:style-name="P24"><text:span text:style-name="T13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Webster's Unabridged Dictionary, 1913 - Amenable</text:p>
            <text:p text:style-name="P25"/>
            <text:p text:style-name="P26">A·me’na·ble</text:p>
            <text:p text:style-name="P25">1. (Old Law) Easy to be led; governable, as a woman by her husband. [Obs.] Jacob.</text:p>
            <text:p text:style-name="P7">4. Willing to yield or submit; responsive; tractable.</text:p>
          </table:table-cell>
        </table:table-row>
      </table:table>
      <text:p text:style-name="P27"><text:span text:style-name="T13"/></text:p>
      <text:p text:style-name="P28">The purpose of Jotham’s parable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9">Judges 9:7f-7h</text:p>
            <text:p text:style-name="P30">Hearken unto me, ye men of Shechem, that God may hearken unto you.</text:p>
          </table:table-cell>
        </table:table-row>
      </table:table>
      <text:list text:style-name="L4">
        <text:list-item>
          <text:p text:style-name="P31">Jotham’s trust in God is evident right from his opening statement.</text:p>
        </text:list-item>
        <text:list-item>
          <text:p text:style-name="P32">Jotham doesn’t use his familial status or his father Gideon’s fame to challenge Abimelech.</text:p>
        </text:list-item>
      </text:list>
      <text:p text:style-name="P33"/>
      <text:p text:style-name="P34">Jotham’s parable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5"><text:span text:style-name="T18">Judges 9:8-15</text:span><text:span text:style-name="T19"><text:line-break/></text:span><text:span text:style-name="T20">8</text:span><text:span text:style-name="T19"> </text:span><text:span text:style-name="T41">The trees</text:span><text:span text:style-name="T19"> went forth on a time to anoint a king over them; and they said unto </text:span><text:span text:style-name="T42">the olive tree</text:span><text:span text:style-name="T19">, Reign </text:span><text:span text:style-name="T43">thou</text:span><text:span text:style-name="T19"> over </text:span><text:span text:style-name="T43">us</text:span><text:span text:style-name="T19">.</text:span></text:p>
            <text:p text:style-name="P36"><text:span text:style-name="T44">9</text:span> But <text:span text:style-name="T45">the olive tree</text:span> said unto <text:span text:style-name="T46">them</text:span>, Should <text:span text:style-name="T46">I</text:span> leave my fatness, wherewith by <text:span text:style-name="T46">me</text:span> they honour God and man, and go to be promoted over <text:span text:style-name="T47">the trees</text:span>?</text:p>
            <text:p text:style-name="P36"><text:span text:style-name="T44">10</text:span> And <text:span text:style-name="T47">the trees</text:span> said to <text:span text:style-name="T45">the fig tree</text:span>, Come <text:span text:style-name="T46">thou</text:span>, and reign over <text:span text:style-name="T46">us</text:span>.</text:p>
            <text:p text:style-name="P36"><text:span text:style-name="T44">11</text:span> But <text:span text:style-name="T45">the fig tree</text:span> said unto <text:span text:style-name="T46">them</text:span>, Should <text:span text:style-name="T46">I</text:span> forsake my sweetness, and my good fruit, and go to be promoted over <text:span text:style-name="T47">the trees</text:span>?</text:p>
            <text:p text:style-name="P36"><text:span text:style-name="T44">12</text:span> Then said <text:span text:style-name="T47">the trees</text:span> unto <text:span text:style-name="T45">the vine</text:span>, Come <text:span text:style-name="T46">thou</text:span>, and reign over <text:span text:style-name="T46">us</text:span>.</text:p>
            <text:p text:style-name="P36"><text:span text:style-name="T44">13</text:span> And <text:span text:style-name="T45">the vine</text:span> said unto <text:span text:style-name="T46">them</text:span>, Should <text:span text:style-name="T46">I</text:span> leave my wine, which cheereth God and man, and go to be promoted over <text:span text:style-name="T47">the trees</text:span>?</text:p>
            <text:p text:style-name="P36"><text:span text:style-name="T44">14</text:span> Then said <text:span text:style-name="T47">all the trees</text:span> unto the <text:span text:style-name="T48">bramble</text:span>, Come <text:span text:style-name="T46">thou</text:span>, and reign over <text:span text:style-name="T46">us</text:span>.</text:p>
            <text:p text:style-name="P36"><text:span text:style-name="T44">15</text:span> And the <text:span text:style-name="T48">bramble</text:span> said unto <text:span text:style-name="T47">the trees</text:span>, If in truth <text:span text:style-name="T46">ye</text:span> anoint <text:span text:style-name="T46">me</text:span> king over <text:span text:style-name="T46">you</text:span>, then come and put <text:span text:style-name="T46">your</text:span> trust in <text:span text:style-name="T46">my</text:span> shadow: and if not, let fire come out of the <text:span text:style-name="T48">bramble</text:span>, and devour the <text:span text:style-name="T47">cedars of Lebanon</text:span>.</text:p>
          </table:table-cell>
        </table:table-row>
      </table:table>
      <text:p text:style-name="P37"/>
      <text:p text:style-name="P38">Jotham explains his parable <text:span text:style-name="T49">and presents his case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5"><text:span text:style-name="T18">Judges 9:16-20</text:span><text:span text:style-name="T19"><text:line-break/></text:span><text:span text:style-name="T20">16</text:span><text:span text:style-name="T19"> Now therefore, if </text:span><text:span text:style-name="T43">ye</text:span><text:span text:style-name="T19"> have done truly and sincerely, in that </text:span><text:span text:style-name="T43">ye</text:span><text:span text:style-name="T19"> have made </text:span><text:span text:style-name="T50">Abimelech</text:span><text:span text:style-name="T19"> king, and if </text:span><text:span text:style-name="T43">ye</text:span><text:span text:style-name="T19"> have dealt well with </text:span><text:span text:style-name="T42">Jerubbaal</text:span><text:span text:style-name="T19"> and his house, and have done unto him according to the deserving of his hands;</text:span></text:p>
            <text:p text:style-name="P36"><text:span text:style-name="T44">17</text:span> (For <text:span text:style-name="T45">my father</text:span> fought for <text:span text:style-name="T46">you</text:span>, and adventure<text:span text:style-name="T46">d his life far, </text:span>and delivered <text:span text:style-name="T46">you</text:span> out of the hand of Midian:</text:p>
            <text:p text:style-name="P36"><text:span text:style-name="T44">18</text:span> And <text:span text:style-name="T46">ye</text:span> are risen up against <text:span text:style-name="T45">my father's</text:span> house this day, and have slain his sons, threescore and ten persons, upon one stone, and have made <text:span text:style-name="T48">Abimelech</text:span>, the son of his maidservant, king over <text:span text:style-name="T47">the men of Shechem</text:span>, because he is <text:span text:style-name="T46">your</text:span> brother;)</text:p>
            <text:p text:style-name="P36"><text:span text:style-name="T44">19</text:span> If <text:span text:style-name="T46">ye</text:span> then have dealt truly and sincerely with <text:span text:style-name="T45">Jerubbaal</text:span> and with his house this day, then rejoice <text:span text:style-name="T46">ye</text:span> in <text:span text:style-name="T48">Abimelech</text:span>, and let him also rejoice in <text:span text:style-name="T46">you</text:span>:</text:p>
            <text:p text:style-name="P36"><text:span text:style-name="T44">20</text:span> But if not, let fire come out from <text:span text:style-name="T48">Abimelech</text:span>, and devour <text:span text:style-name="T47">the men of Shechem</text:span>, and <text:span text:style-name="T47">the house of Millo</text:span>; and let fire come out from <text:span text:style-name="T47">the men of Shechem</text:span>, and from <text:span text:style-name="T47">the house of Millo</text:span>, and devour <text:span text:style-name="T48">Abimelech</text:span>.</text:p>
          </table:table-cell>
        </table:table-row>
      </table:table>
      <text:list text:style-name="L5">
        <text:list-item>
          <text:p text:style-name="P39"><text:span text:style-name="T51">Take note </text:span><text:span text:style-name="T52">of what Jotham does </text:span><text:span text:style-name="T53">not do</text:span><text:span text:style-name="T52"> and that he prese</text:span><text:span text:style-name="T51">nts his case as if before a judge (</text:span><text:span text:style-name="T18">v19,20</text:span><text:span text:style-name="T51">).</text:span></text:p>
        </text:list-item>
        <text:list-item>
          <text:p text:style-name="P40"><text:span text:style-name="T54">Note </text:span><text:span text:style-name="T55">also </text:span><text:span text:style-name="T54">that the bramble’s statements are both proud and haughty (</text:span><text:span text:style-name="T18">Proverbs 16:18</text:span><text:span text:style-name="T54">) </text:span><text:span text:style-name="T56">whereas the olive tree, the fig tree, and the vine are content to </text:span><text:span text:style-name="T57">both </text:span><text:span text:style-name="T56">stay and serve.</text:span></text:p>
        </text:list-item>
      </text:list>
      <text:p text:style-name="P41"><text:span text:style-name="T58"/></text:p>
      <text:p text:style-name="P42">Parable key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43">Object</text:p>
          </table:table-cell>
          <table:table-cell table:style-name="Table8.A1" office:value-type="string">
            <text:p text:style-name="P43">Description</text:p>
          </table:table-cell>
          <table:table-cell table:style-name="Table8.C1" office:value-type="string">
            <text:p text:style-name="P43">Represents</text:p>
          </table:table-cell>
        </table:table-row>
        <table:table-row>
          <table:table-cell table:style-name="Table8.A2" office:value-type="string">
            <text:p text:style-name="P44">The olive tree, the fig tree, the vine</text:p>
          </table:table-cell>
          <table:table-cell table:style-name="Table8.A2" office:value-type="string">
            <text:p text:style-name="P44">Productive plants that provide fruit</text:p>
          </table:table-cell>
          <table:table-cell table:style-name="Table8.C2" office:value-type="string">
            <text:p text:style-name="P44">Gideon</text:p>
          </table:table-cell>
        </table:table-row>
        <table:table-row>
          <table:table-cell table:style-name="Table8.A2" office:value-type="string">
            <text:p text:style-name="P44">The trees, cedars of Lebanon</text:p>
          </table:table-cell>
          <table:table-cell table:style-name="Table8.A2" office:value-type="string">
            <text:p text:style-name="P44"><text:span text:style-name="T59">Decorative t</text:span>rees <text:span text:style-name="T59">that </text:span>provide no fruit</text:p>
          </table:table-cell>
          <table:table-cell table:style-name="Table8.C2" office:value-type="string">
            <text:p text:style-name="P45">The men of Shechem, the house of Millo <text:span text:style-name="T60">(forsook God, idolatry)</text:span></text:p>
          </table:table-cell>
        </table:table-row>
        <table:table-row>
          <table:table-cell table:style-name="Table8.A2" office:value-type="string">
            <text:p text:style-name="P46">Bramble</text:p>
          </table:table-cell>
          <table:table-cell table:style-name="Table8.A2" office:value-type="string">
            <text:p text:style-name="P46">A rough, prickly shrub <text:span text:style-name="T61">or a thorn-tree (buckthorn)</text:span>.</text:p>
          </table:table-cell>
          <table:table-cell table:style-name="Table8.C2" office:value-type="string">
            <text:p text:style-name="P47">Abimelech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ackChancery" svg:font-family="BlackChancery" style:font-pitch="variable"/>
    <style:font-face style:name="Gabriela Nerd Font" svg:font-family="'Gabriela Nerd Fon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14T12:36:47.580000000</meta:creation-date>
    <dc:date>2026-07-11T12:31:02.516079016</dc:date>
    <meta:editing-duration>PT12H44M12S</meta:editing-duration>
    <meta:editing-cycles>173</meta:editing-cycles>
    <meta:generator>LibreOffice/26.2.4.2$Linux_X86_64 LibreOffice_project/64a984c51f4702dbd3710b13428c673a2f1292e7</meta:generator>
    <meta:print-date>2024-11-15T15:44:38.593000000</meta:print-date>
    <meta:printed-by>PDF files</meta:printed-by>
    <meta:document-statistic meta:table-count="8" meta:image-count="1" meta:object-count="0" meta:page-count="3" meta:paragraph-count="71" meta:word-count="1106" meta:character-count="5987" meta:non-whitespace-character-count="4964"/>
  </office:meta>
</office:document-meta>
</file>