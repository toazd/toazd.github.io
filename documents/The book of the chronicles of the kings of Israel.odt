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in" table:align="center" style:shadow="#808080 0.0403in 0.0403in"/>
    </style:style>
    <style:style style:name="Table1.A" style:family="table-column">
      <style:table-column-properties style:column-width="7in"/>
    </style:style>
    <style:style style:name="Table1.A1" style:family="table-cell">
      <style:table-cell-properties fo:padding="0.0382in" fo:border="0.75pt solid #000000"/>
    </style:style>
    <style:style style:name="Table2" style:family="table">
      <style:table-properties style:width="7in" table:align="center" style:shadow="#808080 0.0403in 0.0403in"/>
    </style:style>
    <style:style style:name="Table2.A" style:family="table-column">
      <style:table-column-properties style:column-width="7in"/>
    </style:style>
    <style:style style:name="Table2.A1" style:family="table-cell">
      <style:table-cell-properties fo:padding="0.0382in" fo:border="0.75pt solid #000000"/>
    </style:style>
    <style:style style:name="Table3" style:family="table">
      <style:table-properties style:width="7in" table:align="center" style:shadow="#808080 0.0403in 0.0403in"/>
    </style:style>
    <style:style style:name="Table3.A" style:family="table-column">
      <style:table-column-properties style:column-width="7in"/>
    </style:style>
    <style:style style:name="Table3.A1" style:family="table-cell">
      <style:table-cell-properties fo:padding="0.0382in" fo:border="0.75pt solid #000000"/>
    </style:style>
    <style:style style:name="Table4" style:family="table">
      <style:table-properties style:width="7in" table:align="center" style:shadow="#808080 0.0403in 0.0403in"/>
    </style:style>
    <style:style style:name="Table4.A" style:family="table-column">
      <style:table-column-properties style:column-width="7in"/>
    </style:style>
    <style:style style:name="Table4.A1" style:family="table-cell">
      <style:table-cell-properties fo:padding="0.0382in" fo:border="0.7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Nerd Font" fo:font-size="12pt" officeooo:rsid="00187a64" officeooo:paragraph-rsid="00187a64" style:font-size-asian="12pt" style:font-size-complex="12pt"/>
    </style:style>
    <style:style style:name="P2" style:family="paragraph" style:parent-style-name="Standard">
      <style:text-properties officeooo:rsid="0016a901" officeooo:paragraph-rsid="0016a901"/>
    </style:style>
    <style:style style:name="P3" style:family="paragraph" style:parent-style-name="Standard">
      <style:text-properties officeooo:rsid="0016a901" officeooo:paragraph-rsid="001b1e0d"/>
    </style:style>
    <style:style style:name="P4" style:family="paragraph" style:parent-style-name="Standard">
      <style:text-properties officeooo:rsid="0016a901" officeooo:paragraph-rsid="0023a68d"/>
    </style:style>
    <style:style style:name="P5" style:family="paragraph" style:parent-style-name="Standard">
      <style:text-properties officeooo:rsid="001e0358" officeooo:paragraph-rsid="0016a901"/>
    </style:style>
    <style:style style:name="P6" style:family="paragraph" style:parent-style-name="Standard">
      <style:text-properties officeooo:rsid="0028dde4" officeooo:paragraph-rsid="0028dde4"/>
    </style:style>
    <style:style style:name="P7" style:family="paragraph" style:parent-style-name="Standard">
      <style:text-properties officeooo:rsid="001e0358" officeooo:paragraph-rsid="001e0358"/>
    </style:style>
    <style:style style:name="P8" style:family="paragraph" style:parent-style-name="Table_20_Contents">
      <style:text-properties fo:color="#127622" loext:opacity="100%"/>
    </style:style>
    <style:style style:name="P9" style:family="paragraph" style:parent-style-name="Standard">
      <style:text-properties officeooo:rsid="001e0358" officeooo:paragraph-rsid="0025f2a8"/>
    </style:style>
    <style:style style:name="P10" style:family="paragraph" style:parent-style-name="Table_20_Contents">
      <style:text-properties fo:color="#127622" loext:opacity="100%" officeooo:paragraph-rsid="002f9e51"/>
    </style:style>
    <style:style style:name="P11" style:family="paragraph" style:parent-style-name="Table_20_Contents">
      <style:text-properties officeooo:paragraph-rsid="002f9e51"/>
    </style:style>
    <style:style style:name="P12" style:family="paragraph" style:parent-style-name="Standard">
      <style:text-properties officeooo:rsid="002f9e51" officeooo:paragraph-rsid="002f9e51"/>
    </style:style>
    <style:style style:name="T1" style:family="text">
      <style:text-properties fo:font-style="italic" officeooo:rsid="0016a901" style:font-style-asian="italic" style:font-style-complex="italic"/>
    </style:style>
    <style:style style:name="T2" style:family="text">
      <style:text-properties officeooo:rsid="0016a901"/>
    </style:style>
    <style:style style:name="T3" style:family="text">
      <style:text-properties fo:font-style="italic" style:font-style-asian="italic" style:font-style-complex="italic"/>
    </style:style>
    <style:style style:name="T4" style:family="text">
      <style:text-properties officeooo:rsid="001a7125"/>
    </style:style>
    <style:style style:name="T5" style:family="text">
      <style:text-properties fo:font-size="10pt" officeooo:rsid="001a7125" style:font-size-asian="10pt" style:font-size-complex="10pt"/>
    </style:style>
    <style:style style:name="T6" style:family="text">
      <style:text-properties officeooo:rsid="0021a9a9"/>
    </style:style>
    <style:style style:name="T7" style:family="text">
      <style:text-properties fo:color="#127622" loext:opacity="100%" officeooo:rsid="0021a9a9"/>
    </style:style>
    <style:style style:name="T8" style:family="text">
      <style:text-properties officeooo:rsid="0023a68d"/>
    </style:style>
    <style:style style:name="T9" style:family="text">
      <style:text-properties fo:color="#127622" loext:opacity="100%"/>
    </style:style>
    <style:style style:name="T10" style:family="text">
      <style:text-properties officeooo:rsid="001b1e0d"/>
    </style:style>
    <style:style style:name="T11" style:family="text">
      <style:text-properties style:text-position="super 58%"/>
    </style:style>
    <style:style style:name="T12" style:family="text">
      <style:text-properties fo:background-color="#fff5ce" loext:char-shading-value="0"/>
    </style:style>
    <style:style style:name="T13" style:family="text">
      <style:text-properties fo:font-style="italic"/>
    </style:style>
    <style:style style:name="T14" style:family="text">
      <style:text-properties fo:background-color="#ffff00" loext:char-shading-value="0"/>
    </style:style>
    <style:style style:name="T15" style:family="text">
      <style:text-properties officeooo:rsid="001bb1e3"/>
    </style:style>
    <style:style style:name="T16" style:family="text">
      <style:text-properties officeooo:rsid="0016bef4"/>
    </style:style>
    <style:style style:name="T17" style:family="text">
      <style:text-properties officeooo:rsid="002a02f6"/>
    </style:style>
    <style:style style:name="T18" style:family="text">
      <style:text-properties officeooo:rsid="002b8487"/>
    </style:style>
    <style:style style:name="T19" style:family="text">
      <style:text-properties fo:color="#127622" loext:opacity="100%" officeooo:rsid="002a02f6"/>
    </style:style>
    <style:style style:name="T20" style:family="text">
      <style:text-properties officeooo:rsid="0025f2a8"/>
    </style:style>
    <style:style style:name="T21" style:family="text">
      <style:text-properties style:text-position="super 58%" officeooo:rsid="0025f2a8"/>
    </style:style>
    <style:style style:name="T22" style:family="text">
      <style:text-properties style:text-position="0% 100%"/>
    </style:style>
    <style:style style:name="T23" style:family="text">
      <style:text-properties officeooo:rsid="002c95fd"/>
    </style:style>
    <style:style style:name="T24" style:family="text">
      <style:text-properties officeooo:rsid="002bf658"/>
    </style:style>
    <style:style style:name="T25" style:family="text">
      <style:text-properties officeooo:rsid="0020320a"/>
    </style:style>
    <style:style style:name="T26" style:family="text">
      <style:text-properties officeooo:rsid="003006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oes the phrase “<text:span text:style-name="T1">the book of the chronicles of the kings of Israel</text:span><text:span text:style-name="T2">” </text:span>refer to the book of Chronicles?</text:p>
      <text:p text:style-name="P2"/>
      <text:p text:style-name="P2"/>
      <text:p text:style-name="P3">The phrase “<text:span text:style-name="T3">the book of the chronicles of the kings of Israel</text:span>” shows up 18 times in 18 verses in 9 chapters in 2 books <text:span text:style-name="T4">(</text:span><text:span text:style-name="T5">source: King James Pure Bible search</text:span><text:span text:style-name="T4">)</text:span>.</text:p>
      <text:p text:style-name="P3"/>
      <text:p text:style-name="P4"><text:span text:style-name="T6">Many of the kings of Judah &amp; Israel are mentioned in both the book of </text:span><text:span text:style-name="T7">Kings</text:span><text:span text:style-name="T6"> (1 &amp; 2) and the book of </text:span><text:span text:style-name="T7">Chronicles</text:span><text:span text:style-name="T6"> (1 &amp; 2) </text:span><text:span text:style-name="T8">and so i</text:span>t seems logical to conclude that the Bible is referring to the book of <text:span text:style-name="T9">Chronicles</text:span> <text:span text:style-name="T10">until we check the Bible very carefully. </text:span></text:p>
      <text:p text:style-name="P2"/>
      <table:table table:name="Table1" table:style-name="Table1">
        <table:table-column table:style-name="Table1.A"/>
        <table:table-row>
          <table:table-cell table:style-name="Table1.A1" office:value-type="string">
            <text:p text:style-name="Table_20_Contents"><text:span text:style-name="T9">1 Kings 16:25-27</text:span><text:line-break/><text:span text:style-name="T11">25</text:span> But <text:span text:style-name="T12">Omri</text:span> wrought evil in the eyes of the LORD, and did worse than all that <text:span text:style-name="T13">were</text:span> before him. <text:line-break/><text:span text:style-name="T11">26</text:span> For he walked in all the way of Jeroboam the son of Nebat, and in his sin wherewith he made Israel to sin, to provoke the LORD God of Israel to anger with their vanities. <text:line-break/><text:span text:style-name="T11">27</text:span> Now <text:span text:style-name="T12">the rest of the acts of Omri</text:span> which he did, and <text:span text:style-name="T12">his might that he shewed</text:span>, <text:span text:style-name="T13">are</text:span> they not written in <text:span text:style-name="T14">the book of the chronicles of the kings of Israel</text:span>?</text:p>
          </table:table-cell>
        </table:table-row>
      </table:table>
      <text:p text:style-name="P2"/>
      <text:p text:style-name="P2">And if we check the book of <text:span text:style-name="T9">Chronicles</text:span> <text:span text:style-name="T15">we see that </text:span>Omri king of Israel <text:span text:style-name="T16">is mentioned exactly one time:</text:span></text:p>
      <text:p text:style-name="P2"/>
      <table:table table:name="Table2" table:style-name="Table2">
        <table:table-column table:style-name="Table2.A"/>
        <table:table-row>
          <table:table-cell table:style-name="Table2.A1" office:value-type="string">
            <text:p text:style-name="Table_20_Contents"><text:span text:style-name="T9">2 Chronicles 22:1-3</text:span><text:line-break/><text:span text:style-name="T11">1</text:span> And the inhabitants of Jerusalem made Ahaziah his youngest son king in his stead: for the band of men that came with the Arabians to the camp had slain all the eldest. So Ahaziah the son of Jehoram king of Judah reigned. <text:line-break/><text:span text:style-name="T11">2</text:span> Forty and two years old <text:span text:style-name="T13">was</text:span> Ahaziah when he began to reign, and he reigned one year in Jerusalem. His mother's name also <text:span text:style-name="T13">was</text:span> Athaliah the daughter of <text:span text:style-name="T12">Omri</text:span>. <text:line-break/><text:span text:style-name="T11">3</text:span> He also walked in the ways of the house of Ahab: for his mother was his counsellor to do wickedly.</text:p>
          </table:table-cell>
        </table:table-row>
      </table:table>
      <text:p text:style-name="P5"/>
      <text:p text:style-name="P6">Baasha king of Israel’<text:span text:style-name="T17">s name</text:span> is mentioned<text:span text:style-name="T18"> </text:span><text:span text:style-name="T17">4 times in </text:span><text:span text:style-name="T19">1</text:span><text:span text:style-name="T17"> &amp; </text:span><text:span text:style-name="T19">2 Chronicles</text:span><text:span text:style-name="T17">.</text:span></text:p>
      <text:p text:style-name="P7"/>
      <table:table table:name="Table3" table:style-name="Table3">
        <table:table-column table:style-name="Table3.A"/>
        <table:table-row>
          <table:table-cell table:style-name="Table3.A1" office:value-type="string">
            <text:p text:style-name="P8">I Kings 16:5:</text:p>
            <text:p text:style-name="Table_20_Contents">Now <text:span text:style-name="T12">the rest of the acts of Baasha</text:span>, and <text:span text:style-name="T12">what he did</text:span>, and <text:span text:style-name="T12">his might</text:span>, are they not written in <text:span text:style-name="T14">the book of the chronicles of the kings of Israel</text:span>?</text:p>
          </table:table-cell>
        </table:table-row>
      </table:table>
      <text:p text:style-name="P7"/>
      <table:table table:name="Table4" table:style-name="Table4">
        <table:table-column table:style-name="Table4.A"/>
        <table:table-row>
          <table:table-cell table:style-name="Table4.A1" office:value-type="string">
            <text:p text:style-name="P8">II Chronicles 16:1,<text:span text:style-name="T20">3,5,6</text:span></text:p>
            <text:p text:style-name="Table_20_Contents"><text:span text:style-name="T21">1</text:span><text:span text:style-name="T20"> </text:span>In the six and thirtieth year of the reign of Asa <text:span text:style-name="T12">Baasha king of Israel</text:span> came up against Judah, and built Ramah, to the intent that he might let none go out or come in to Asa king of Judah.</text:p>
            <text:p text:style-name="Table_20_Contents"><text:span text:style-name="T11">3</text:span> There is a league between me and thee, as there was between my father and thy father: behold, I have sent thee silver and gold; go, break thy league with <text:span text:style-name="T12">Baasha king of Israel</text:span>, that he may depart from me.</text:p>
            <text:p text:style-name="Table_20_Contents"><text:span text:style-name="T11">5</text:span> And it came to pass, when <text:span text:style-name="T12">Baasha</text:span> heard it, that he left off building of Ramah, and let his work cease.</text:p>
            <text:p text:style-name="Table_20_Contents"><text:span text:style-name="T11">6</text:span><text:span text:style-name="T22"> </text:span>Then Asa the king took all Judah; and they carried away the stones of Ramah, and the timber thereof, wherewith <text:span text:style-name="T12">Baasha</text:span> was building; and he built therewith Geba and Mizpah.</text:p>
          </table:table-cell>
        </table:table-row>
      </table:table>
      <text:p text:style-name="P7"/>
      <text:p text:style-name="P9">And by <text:span text:style-name="T23">the</text:span> omission<text:span text:style-name="T24">s</text:span> of the details that we expect to see <text:span text:style-name="T24">we can</text:span> <text:span text:style-name="T25">safely</text:span> conclude that the phrase <text:span text:style-name="T2">“</text:span><text:span text:style-name="T1">the book of the chronicles of the kings of Israel</text:span><text:span text:style-name="T2">” </text:span>does not <text:span text:style-name="T26">always </text:span>refer to the book of <text:span text:style-name="T9">Chronicles</text:span>.</text:p>
      <text:p text:style-name="P9"/>
      <table:table table:name="Table5" table:style-name="Table5">
        <table:table-column table:style-name="Table5.A"/>
        <text:soft-page-break/>
        <table:table-row>
          <table:table-cell table:style-name="Table5.A1" office:value-type="string">
            <text:p text:style-name="P10">2 Kings 10:34</text:p>
            <text:p text:style-name="P11">Now the rest of the acts of <text:span text:style-name="T12">Jehu</text:span>, and all that he did, and all his might, are they not written in <text:span text:style-name="T14">the book of the chronicles of the kings of Israel</text:span>?</text:p>
          </table:table-cell>
        </table:table-row>
      </table:table>
      <text:p text:style-name="P9"/>
      <text:p text:style-name="P9"/>
      <table:table table:name="Table6" table:style-name="Table6">
        <table:table-column table:style-name="Table6.A"/>
        <table:table-row>
          <table:table-cell table:style-name="Table6.A1" office:value-type="string">
            <text:p text:style-name="P10">2 Chronicles 22:7</text:p>
            <text:p text:style-name="P11">And the destruction of Ahaziah was of God by coming to Joram: for when he was come, he went out with Jehoram against <text:span text:style-name="T12">Jehu the son of Nimshi</text:span>, whom the LORD had anointed to cut off the house of Ahab.</text:p>
          </table:table-cell>
        </table:table-row>
      </table:table>
      <text:p text:style-name="P9"/>
      <text:p text:style-name="P12">Jehu the son of Jehoshaphat the son of Nimshi is mentioned only once in the book of <text:span text:style-name="T9">Chronic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20:55:43.165005300</meta:creation-date>
    <dc:date>2026-07-11T12:30:01.596761926</dc:date>
    <meta:editing-duration>PT1H1M49S</meta:editing-duration>
    <meta:editing-cycles>32</meta:editing-cycles>
    <meta:generator>LibreOffice/26.2.4.2$Linux_X86_64 LibreOffice_project/64a984c51f4702dbd3710b13428c673a2f1292e7</meta:generator>
    <dc:title>The book of the chronicles of the kings of Israel</dc:title>
    <meta:print-date>2025-07-15T21:16:17.755253700</meta:print-date>
    <meta:printed-by>PDF files</meta:printed-by>
    <meta:document-statistic meta:table-count="6" meta:image-count="0" meta:object-count="0" meta:page-count="2" meta:paragraph-count="20" meta:word-count="629" meta:character-count="3143" meta:non-whitespace-character-count="2529"/>
  </office:meta>
</office:document-meta>
</file>