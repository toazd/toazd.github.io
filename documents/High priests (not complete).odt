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d2e5"/>
    </style:style>
    <style:style style:name="P2" style:family="paragraph" style:parent-style-name="Standard">
      <style:text-properties officeooo:rsid="001dd2e5" officeooo:paragraph-rsid="001dd2e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Chronicles 6:1-15</text:p>
      <text:p text:style-name="P1"/>
      <text:p text:style-name="P2">Where’s the Amariah that served during Jehoshaphat’s reign? 2Ch 19:11. With this current lineup it cannot be either one (before David or after Hezekiah)</text:p>
      <text:p text:style-name="P1"><text:line-break/>Levi<text:line-break/>Kohath<text:line-break/>Amram<text:line-break/>Aaron (Ezra 7:5)<text:line-break/>Eleazar (Ezra 7:5; 1Ch 24:1-3)<text:line-break/>Phinehas (Ezra 7:5)<text:line-break/>Abishua (Ezra 7:5)<text:line-break/>Bukki (Ezra 7:4)<text:line-break/>Uzzi (Ezra 7:4)<text:line-break/>Zerahiah (Ezra 7:4)<text:line-break/>Ahitub (only mentioned in Neh 11:11; not sure where he fits in exactly)<text:line-break/>Meraioth (Neh 11:11) (Ezra 7:3)<text:line-break/><text:span text:style-name="T1">Amariah</text:span> (1)<text:line-break/>Ahitub (1)<text:line-break/>Zadok (1) (2Sa 15:27; David's reign)<text:line-break/>Ahimaaz<text:line-break/>Azariah (1) (2Sa 15:27; Zadok's grandson during David's reign) (2Ch 26:17) (Ezra 7:3?)<text:line-break/>Johanan<text:line-break/>Jehoiada (1Ch 27:5) (not sure if before or after Johanan)<text:line-break/>Zechariah (2Ch 24:20; son of Jehoida; not sure if before or after Johanan)<text:line-break/>Urijah (2Ki 16:10-16)<text:line-break/>Azariah (2) (2Ch 31:10) (in the temple that Solomon built in Jerusalem) (Ezra 7:3?)<text:line-break/><text:span text:style-name="T1">Amariah</text:span> (2) (Ezra 7:3)<text:line-break/>Ahitub (2) (Ezra 7:2)<text:line-break/>Zadok (2) (Ezra 7:2)<text:line-break/>Shallum (Meshullam Neh 11:11; Shallum Ezra 7:2)<text:line-break/>Hilkiah (Josiah 2Ki 24:4; Ezra 7:1)<text:line-break/>Azariah (3) (Ezra 7:1) (cannot be this Azariah because Hilkiah served during Josiah's reign who is the 3rd king after Hezekiah)<text:line-break/>Seraiah (Ezra 7:1)<text:line-break/>Jehozadak (Babylonian captivity)<text:line-break/>Ezra (Ezra 7: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4:21:31.131993200</meta:creation-date>
    <dc:title>default</dc:title>
    <meta:editing-duration>PT1M46S</meta:editing-duration>
    <meta:editing-cycles>3</meta:editing-cycles>
    <meta:generator>LibreOffice/26.2.4.2$Linux_X86_64 LibreOffice_project/64a984c51f4702dbd3710b13428c673a2f1292e7</meta:generator>
    <dc:date>2026-07-11T12:20:25.581770329</dc:date>
    <meta:document-statistic meta:table-count="0" meta:image-count="0" meta:object-count="0" meta:page-count="1" meta:paragraph-count="3" meta:word-count="191" meta:character-count="1181" meta:non-whitespace-character-count="992"/>
    <meta:template xlink:type="simple" xlink:actuate="onRequest" xlink:title="default" xlink:href="../../../../AppData/Roaming/LibreOffice/4/user/template/default1.ott" meta:date="2026-02-10T14:21:29.765046900"/>
  </office:meta>
</office:document-meta>
</file>