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3.95in" style:rel-column-width="32767*"/>
    </style:style>
    <style:style style:name="Table1.B" style:family="table-column">
      <style:table-column-properties style:column-width="3.9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text-properties officeooo:rsid="001c1fc8" officeooo:paragraph-rsid="001c1fc8"/>
    </style:style>
    <style:style style:name="P3" style:family="paragraph" style:parent-style-name="Table_20_Contents" style:list-style-name="L1">
      <style:text-properties officeooo:rsid="001c5abd" officeooo:paragraph-rsid="001c5abd"/>
    </style:style>
    <style:style style:name="P4" style:family="paragraph" style:parent-style-name="Table_20_Contents" style:list-style-name="L1">
      <style:text-properties officeooo:rsid="001f652f" officeooo:paragraph-rsid="001f652f"/>
    </style:style>
    <style:style style:name="P5" style:family="paragraph" style:parent-style-name="Table_20_Contents" style:list-style-name="L1">
      <style:text-properties officeooo:rsid="00349433" officeooo:paragraph-rsid="00349433"/>
    </style:style>
    <style:style style:name="P6" style:family="paragraph" style:parent-style-name="Table_20_Contents" style:list-style-name="L1">
      <style:text-properties fo:color="#127622" loext:opacity="100%" officeooo:rsid="0034f46b"/>
    </style:style>
    <style:style style:name="P7" style:family="paragraph" style:parent-style-name="Table_20_Contents" style:list-style-name="L2">
      <style:text-properties officeooo:rsid="00212a13" officeooo:paragraph-rsid="00212a13"/>
    </style:style>
    <style:style style:name="P8" style:family="paragraph" style:parent-style-name="Table_20_Contents" style:list-style-name="L2">
      <style:text-properties officeooo:rsid="004e5110" officeooo:paragraph-rsid="004e5110"/>
    </style:style>
    <style:style style:name="P9" style:family="paragraph" style:parent-style-name="Table_20_Contents" style:list-style-name="L2"/>
    <style:style style:name="P10" style:family="paragraph" style:parent-style-name="Table_20_Contents" style:list-style-name="L2">
      <style:text-properties officeooo:paragraph-rsid="005083ae"/>
    </style:style>
    <style:style style:name="P11" style:family="paragraph" style:parent-style-name="Table_20_Contents" style:list-style-name="L2">
      <style:text-properties officeooo:rsid="0022f31b" officeooo:paragraph-rsid="0022f31b"/>
    </style:style>
    <style:style style:name="P12" style:family="paragraph" style:parent-style-name="Table_20_Contents" style:list-style-name="L2">
      <style:text-properties officeooo:rsid="002592cc" officeooo:paragraph-rsid="002592cc"/>
    </style:style>
    <style:style style:name="P13" style:family="paragraph" style:parent-style-name="Table_20_Contents" style:list-style-name="L2">
      <style:text-properties officeooo:rsid="0048753d" officeooo:paragraph-rsid="0048753d"/>
    </style:style>
    <style:style style:name="P14" style:family="paragraph" style:parent-style-name="Table_20_Contents" style:list-style-name="L2">
      <style:text-properties officeooo:rsid="004c84f8" officeooo:paragraph-rsid="004c84f8"/>
    </style:style>
    <style:style style:name="P15" style:family="paragraph" style:parent-style-name="Table_20_Contents" style:list-style-name="L2">
      <style:text-properties officeooo:rsid="00496deb" officeooo:paragraph-rsid="00496deb"/>
    </style:style>
    <style:style style:name="P16" style:family="paragraph" style:parent-style-name="Table_20_Contents" style:list-style-name="L3">
      <style:text-properties officeooo:rsid="00272e70" officeooo:paragraph-rsid="00272e70"/>
    </style:style>
    <style:style style:name="P17" style:family="paragraph" style:parent-style-name="Table_20_Contents" style:list-style-name="L3">
      <style:text-properties officeooo:rsid="0057a278" officeooo:paragraph-rsid="0057a278"/>
    </style:style>
    <style:style style:name="P18" style:family="paragraph" style:parent-style-name="Table_20_Contents" style:list-style-name="L3">
      <style:text-properties fo:color="#127622" loext:opacity="100%" officeooo:rsid="0057a278"/>
    </style:style>
    <style:style style:name="P19" style:family="paragraph" style:parent-style-name="Table_20_Contents" style:list-style-name="L3">
      <style:text-properties fo:color="#127622" loext:opacity="100%" officeooo:rsid="0056b2c7"/>
    </style:style>
    <style:style style:name="P20" style:family="paragraph" style:parent-style-name="Table_20_Contents" style:list-style-name="L4">
      <style:text-properties officeooo:rsid="00288f95" officeooo:paragraph-rsid="00288f95"/>
    </style:style>
    <style:style style:name="P21" style:family="paragraph" style:parent-style-name="Table_20_Contents" style:list-style-name="L4">
      <style:text-properties fo:color="#127622" loext:opacity="100%" officeooo:rsid="00288f95" officeooo:paragraph-rsid="00288f95"/>
    </style:style>
    <style:style style:name="P22" style:family="paragraph" style:parent-style-name="Table_20_Contents" style:list-style-name="L4">
      <style:text-properties officeooo:rsid="002afef1" officeooo:paragraph-rsid="002afef1"/>
    </style:style>
    <style:style style:name="P23" style:family="paragraph" style:parent-style-name="Table_20_Contents" style:list-style-name="L4">
      <style:text-properties fo:color="#127622" loext:opacity="100%" officeooo:rsid="002afef1"/>
    </style:style>
    <style:style style:name="P24" style:family="paragraph" style:parent-style-name="Table_20_Contents" style:list-style-name="L4">
      <style:text-properties officeooo:rsid="002c0aea" officeooo:paragraph-rsid="002c0aea"/>
    </style:style>
    <style:style style:name="P25" style:family="paragraph" style:parent-style-name="Table_20_Contents" style:list-style-name="L4">
      <style:text-properties officeooo:rsid="002eadd6" officeooo:paragraph-rsid="002eadd6"/>
    </style:style>
    <style:style style:name="P26" style:family="paragraph" style:parent-style-name="Table_20_Contents" style:list-style-name="L4">
      <style:text-properties fo:color="#127622" loext:opacity="100%" officeooo:rsid="00421431"/>
    </style:style>
    <style:style style:name="T1" style:family="text">
      <style:text-properties officeooo:rsid="0043a430"/>
    </style:style>
    <style:style style:name="T2" style:family="text">
      <style:text-properties fo:font-family="Gabriela" style:font-pitch="variable" officeooo:rsid="001c059c"/>
    </style:style>
    <style:style style:name="T3" style:family="text">
      <style:text-properties officeooo:rsid="001c059c"/>
    </style:style>
    <style:style style:name="T4" style:family="text">
      <style:text-properties officeooo:rsid="0036e277"/>
    </style:style>
    <style:style style:name="T5" style:family="text">
      <style:text-properties fo:font-style="italic" officeooo:rsid="0036e277" style:font-style-asian="italic" style:font-style-complex="italic"/>
    </style:style>
    <style:style style:name="T6" style:family="text">
      <style:text-properties fo:color="#127622" loext:opacity="100%"/>
    </style:style>
    <style:style style:name="T7" style:family="text">
      <style:text-properties fo:background-color="#ffff00" loext:char-shading-value="0"/>
    </style:style>
    <style:style style:name="T8" style:family="text">
      <style:text-properties officeooo:rsid="001e0ffe"/>
    </style:style>
    <style:style style:name="T9" style:family="text">
      <style:text-properties officeooo:rsid="0036530b"/>
    </style:style>
    <style:style style:name="T10" style:family="text">
      <style:text-properties fo:background-color="transparent" loext:char-shading-value="0"/>
    </style:style>
    <style:style style:name="T11" style:family="text">
      <style:text-properties fo:background-color="#fff5ce" loext:char-shading-value="0"/>
    </style:style>
    <style:style style:name="T12" style:family="text">
      <style:text-properties style:text-position="super 58%" officeooo:rsid="0046aa79" fo:background-color="transparent" loext:char-shading-value="0"/>
    </style:style>
    <style:style style:name="T13" style:family="text">
      <style:text-properties style:text-position="super 58%" officeooo:rsid="004ae6a3" fo:background-color="transparent" loext:char-shading-value="0"/>
    </style:style>
    <style:style style:name="T14" style:family="text">
      <style:text-properties style:text-position="super 58%" officeooo:rsid="00496deb" fo:background-color="transparent" loext:char-shading-value="0"/>
    </style:style>
    <style:style style:name="T15" style:family="text">
      <style:text-properties fo:color="#127622" loext:opacity="100%" officeooo:rsid="004e5110"/>
    </style:style>
    <style:style style:name="T16" style:family="text">
      <style:text-properties fo:color="#127622" loext:opacity="100%" officeooo:rsid="005083ae"/>
    </style:style>
    <style:style style:name="T17" style:family="text">
      <style:text-properties officeooo:rsid="0053c144"/>
    </style:style>
    <style:style style:name="T18" style:family="text">
      <style:text-properties officeooo:rsid="0053e48a"/>
    </style:style>
    <style:style style:name="T19" style:family="text">
      <style:text-properties fo:font-style="italic" style:font-style-asian="italic" style:font-style-complex="italic"/>
    </style:style>
    <style:style style:name="T20" style:family="text">
      <style:text-properties officeooo:rsid="0055d53d"/>
    </style:style>
    <style:style style:name="T21" style:family="text">
      <style:text-properties officeooo:rsid="0056a32f"/>
    </style:style>
    <style:style style:name="T22" style:family="text">
      <style:text-properties style:text-position="super 58%" officeooo:rsid="002eadd6"/>
    </style:style>
    <style:style style:name="T23" style:family="text">
      <style:text-properties style:text-position="super 58%"/>
    </style:style>
    <style:style style:name="T24" style:family="text">
      <style:text-properties style:text-position="super 58%" officeooo:rsid="002f40b0"/>
    </style:style>
    <style:style style:name="T25" style:family="text">
      <style:text-properties style:text-position="0% 100%"/>
    </style:style>
    <style:style style:name="T26" style:family="text">
      <style:text-properties style:text-position="super 58%" officeooo:rsid="003b0ea6"/>
    </style:style>
    <style:style style:name="T27" style:family="text">
      <style:text-properties style:text-position="super 58%" officeooo:rsid="003f6a09"/>
    </style:style>
    <style:style style:name="T28" style:family="text">
      <style:text-properties style:text-position="super 58%" officeooo:rsid="003bb0cd"/>
    </style:style>
    <style:style style:name="T29" style:family="text">
      <style:text-properties style:text-position="super 58%" officeooo:rsid="00397665"/>
    </style:style>
    <style:style style:name="T30" style:family="text">
      <style:text-properties style:text-position="super 58%" officeooo:rsid="003d7457"/>
    </style:style>
    <style:style style:name="T31" style:family="text">
      <style:text-properties officeooo:rsid="00290054"/>
    </style:style>
    <style:style style:name="T32" style:family="text">
      <style:text-properties fo:color="#127622" loext:opacity="100%" officeooo:rsid="002d2885"/>
    </style:style>
    <style:style style:name="T33" style:family="text">
      <style:text-properties officeooo:rsid="002d2885"/>
    </style:style>
    <style:style style:name="T34" style:family="text">
      <style:text-properties officeooo:rsid="004155cc"/>
    </style:style>
    <style:style style:name="T35" style:family="text">
      <style:text-properties officeooo:rsid="0042143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ord study: </text:span>“<text:span text:style-name="T2">Leviathan</text:span><text:span text:style-name="T3">”</text:span></text:p>
      <text:p text:style-name="Standard"/>
      <text:p text:style-name="P2">Who or what is Leviathan in the scriptures? The word “Leviathan” appears 5 times in 4 verses. <text:span text:style-name="T4">The Leviathan is very obviously a multi-headed, fire-breathing, scaled creature that God created to inhabit the seas that was so fierce and strong that no man could subdue him. But, as we dig into the scriptures deeper we will also see that the Leviathan is also a picture or a type of </text:span><text:span text:style-name="T5">someone</text:span><text:span text:style-name="T4">.</text:span></text:p>
      <text:p text:style-name="P2"/>
      <table:table table:name="Table1" table:style-name="Table1">
        <table:table-column table:style-name="Table1.A"/>
        <table:table-column table:style-name="Table1.B"/>
        <table:table-row>
          <table:table-cell table:style-name="Table1.A1" office:value-type="string">
            <text:p text:style-name="Table_20_Contents"><text:span text:style-name="T6">Job 41:1</text:span><text:line-break/>Canst thou draw out <text:span text:style-name="T7">leviathan</text:span> with an hook? or his tongue with a cord which thou lettest down?</text:p>
          </table:table-cell>
          <table:table-cell table:style-name="Table1.B1" office:value-type="string">
            <text:list text:style-name="L1">
              <text:list-item>
                <text:p text:style-name="P3">The entire chapter describes different aspects of a fire-breathing, scaled, <text:span text:style-name="T8">untameable </text:span>creature called Leviathan <text:span text:style-name="T8">that instills fear into every man</text:span>.</text:p>
              </text:list-item>
              <text:list-item>
                <text:p text:style-name="P4">V1,2, and 31,32 make it clear that this is a creature that dwells in the waters (<text:span text:style-name="T6">Gen 1:2</text:span>)</text:p>
              </text:list-item>
              <text:list-item>
                <text:p text:style-name="P5"><text:span text:style-name="T6">Job 41</text:span> ends with a most interesting phrase “he is a king over all the children of pride”. <text:span text:style-name="T9">If there are children of pride, who is their father?</text:span></text:p>
                <text:list>
                  <text:list-item>
                    <text:p text:style-name="P6">Ezekiel 28:15</text:p>
                  </text:list-item>
                </text:list>
              </text:list-item>
            </text:list>
          </table:table-cell>
        </table:table-row>
        <table:table-row>
          <table:table-cell table:style-name="Table1.A2" office:value-type="string">
            <text:p text:style-name="Table_20_Contents"><text:span text:style-name="T6">Psalms 74:13-14</text:span><text:line-break/>13 Thou di<text:span text:style-name="T10">dst divide the sea by thy strength: thou brakest the </text:span><text:span text:style-name="T11">heads</text:span><text:span text:style-name="T10"> of the </text:span><text:span text:style-name="T7">dragons</text:span><text:span text:style-name="T10"> in the waters.<text:line-break/>14 Thou brakest the </text:span><text:span text:style-name="T11">heads</text:span><text:span text:style-name="T10"> of </text:span><text:span text:style-name="T7">leviathan</text:span><text:span text:style-name="T10"> in pieces</text:span><text:span text:style-name="T12">Gen 3:15?, </text:span><text:span text:style-name="T13">Hab 3:13?, </text:span><text:span text:style-name="T14">Rev 13:3?</text:span><text:span text:style-name="T10">,</text:span> and gavest him to be meat to the people inhabiting the wilderness.</text:p>
          </table:table-cell>
          <table:table-cell table:style-name="Table1.B2" office:value-type="string">
            <text:list text:style-name="L2">
              <text:list-item>
                <text:p text:style-name="P7">It has more than one head</text:p>
                <text:list>
                  <text:list-item>
                    <text:p text:style-name="P8">Only one other creature in the entire Bible has more than one head:</text:p>
                    <text:list>
                      <text:list-item>
                        <text:p text:style-name="P9"><text:span text:style-name="T15">Daniel 7:7,8</text:span> (beast)</text:p>
                      </text:list-item>
                      <text:list-item>
                        <text:p text:style-name="P9"><text:span text:style-name="T15">Revelation 12:3</text:span> (great red dragon)</text:p>
                      </text:list-item>
                      <text:list-item>
                        <text:p text:style-name="P10"><text:span text:style-name="T16">Revelation </text:span><text:span text:style-name="T15">13:1</text:span> (beast)</text:p>
                      </text:list-item>
                    </text:list>
                  </text:list-item>
                </text:list>
              </text:list-item>
              <text:list-item>
                <text:p text:style-name="P11">v13, it is also called a “dragon in the waters”</text:p>
              </text:list-item>
              <text:list-item>
                <text:p text:style-name="P12"><text:span text:style-name="T6">Job 41</text:span> makes it clear that this is not a creature that man could <text:span text:style-name="T17">subdue</text:span> but in v14 we see that God is attributed as giving this creature as food for “<text:span text:style-name="T18">the </text:span>people inhabiting the wilderness”.</text:p>
              </text:list-item>
              <text:list-item>
                <text:p text:style-name="P13"><text:span text:style-name="T6">Gen 3:15</text:span> mentions that God will bruise Satan’s head (singular) but here we see heads (plural).</text:p>
              </text:list-item>
              <text:list-item>
                <text:p text:style-name="P14"><text:span text:style-name="T6">Hab 3:13</text:span> “wounded” the head <text:span text:style-name="T19">out of the house</text:span> of the wicked (“the wicked”, <text:span text:style-name="T20">when </text:span>singular, is Satan).</text:p>
              </text:list-item>
              <text:list-item>
                <text:p text:style-name="P15">In <text:span text:style-name="T6">Rev 13:3</text:span> a singular head is wounded but healed (bruised?).</text:p>
              </text:list-item>
            </text:list>
          </table:table-cell>
        </table:table-row>
        <table:table-row>
          <table:table-cell table:style-name="Table1.A2" office:value-type="string">
            <text:p text:style-name="Table_20_Contents"><text:span text:style-name="T6">Psalms 104:24-26</text:span><text:line-break/>24 O LORD, how manifold are thy works! in wisdom hast thou made them all: the earth is full of thy riches.<text:line-break/>25 So is this great and wide sea, wherein are things creeping innumerable, both small and great beasts.<text:line-break/>26 There go the ships: there is that <text:span text:style-name="T7">leviathan</text:span>, whom thou hast made to play therein.</text:p>
          </table:table-cell>
          <table:table-cell table:style-name="Table1.B2" office:value-type="string">
            <text:list text:style-name="L3">
              <text:list-item>
                <text:p text:style-name="P16">A creature that plays in the great and wide sea.</text:p>
              </text:list-item>
              <text:list-item>
                <text:p text:style-name="P17">Appears to be only talking about the physical creature.</text:p>
              </text:list-item>
              <text:list-item>
                <text:p text:style-name="P16">“<text:span text:style-name="T21">the earth” = Israel</text:span></text:p>
              </text:list-item>
              <text:list-item>
                <text:p text:style-name="P16">“<text:span text:style-name="T21">the sea” = The nations/Gentiles</text:span></text:p>
              </text:list-item>
              <text:list-item>
                <text:p text:style-name="P18">Luke 10:18</text:p>
              </text:list-item>
              <text:list-item>
                <text:p text:style-name="P19">Revelation 12:9</text:p>
              </text:list-item>
            </text:list>
          </table:table-cell>
        </table:table-row>
        <table:table-row>
          <table:table-cell table:style-name="Table1.A2" office:value-type="string">
            <text:p text:style-name="Table_20_Contents"><text:span text:style-name="T6">Isaiah 27:1</text:span><text:line-break/><text:span text:style-name="T11">In that day</text:span> the LORD with his sore and great and strong sword<text:span text:style-name="T22">Eph 6:17, Rev 19:21</text:span> shall punish <text:span text:style-name="T7">leviathan</text:span> the <text:span text:style-name="T7">piercing serpent</text:span>, even <text:span text:style-name="T7">leviathan</text:span> that <text:span text:style-name="T7">crooked serpent</text:span><text:span text:style-name="T23">Job 26:13</text:span>; and he shall slay the <text:span text:style-name="T7">dragon</text:span><text:span text:style-name="T24">Rev 12:9, 20:2</text:span> that is in the<text:span text:style-name="T25"> sea</text:span><text:span text:style-name="T26">Psa 65:7, </text:span><text:span text:style-name="T27">Isa 60:5, </text:span><text:span text:style-name="T28">Dan 7:2,3, </text:span><text:span text:style-name="T29">Rev </text:span><text:span text:style-name="T30">13:1, </text:span><text:span text:style-name="T29">17:5</text:span>.</text:p>
          </table:table-cell>
          <table:table-cell table:style-name="Table1.B2" office:value-type="string">
            <text:list text:style-name="L4">
              <text:list-item>
                <text:p text:style-name="P20"><text:span text:style-name="T6">Isaiah 25:6-8</text:span> is the “that day” of</text:p>
                <text:list>
                  <text:list-item>
                    <text:p text:style-name="P21">Isaiah 25:9, <text:span text:style-name="T31">26:1, 27:1</text:span></text:p>
                  </text:list-item>
                </text:list>
              </text:list-item>
              <text:list-item>
                <text:p text:style-name="P22">Only 3 verses in the entire Bible contain all four words (in any order) “wipe away all tears”:</text:p>
                <text:list>
                  <text:list-item>
                    <text:p text:style-name="P23">Isa 25:8</text:p>
                  </text:list-item>
                  <text:list-item>
                    <text:p text:style-name="P23">Rev 7:17</text:p>
                  </text:list-item>
                  <text:list-item>
                    <text:p text:style-name="P23">Rev 21:4</text:p>
                  </text:list-item>
                </text:list>
              </text:list-item>
              <text:list-item>
                <text:p text:style-name="P24"><text:span text:style-name="T6">Rev 21:4</text:span> is the only one that follows any sort of “feast” (<text:span text:style-name="T6">Isaiah 25:6</text:span>) and that is in <text:span text:style-name="T6">Rev 19:</text:span><text:span text:style-name="T32">9</text:span><text:span text:style-name="T33"> (“the marriage supper of the Lamb”).</text:span></text:p>
              </text:list-item>
              <text:list-item>
                <text:p text:style-name="P25">We also see another parallelism like <text:span text:style-name="T6">Psalm 74:13,14</text:span> where “leviathan” is called a “dragon”, <text:span text:style-name="T34">but in addition it is also called a “serpent”. </text:span><text:span text:style-name="T35">There are only 3 verses in the entire Bible with the words “serpent dragon” in them:</text:span></text:p>
                <text:list>
                  <text:list-item>
                    <text:p text:style-name="P26">Isa 27:1</text:p>
                  </text:list-item>
                  <text:list-item>
                    <text:p text:style-name="P26">Rev 12:9</text:p>
                  </text:list-item>
                  <text:list-item>
                    <text:p text:style-name="P26">Rev 20:2</text:p>
                  </text:list-item>
                </text:list>
              </text:list-item>
            </text:list>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5T07:49:14.749501000</meta:creation-date>
    <dc:title>default</dc:title>
    <meta:editing-duration>PT1H54M57S</meta:editing-duration>
    <meta:editing-cycles>62</meta:editing-cycles>
    <meta:generator>LibreOffice/26.2.4.2$Linux_X86_64 LibreOffice_project/64a984c51f4702dbd3710b13428c673a2f1292e7</meta:generator>
    <dc:date>2026-07-11T12:20:39.565992915</dc:date>
    <meta:document-statistic meta:table-count="1" meta:image-count="0" meta:object-count="0" meta:page-count="1" meta:paragraph-count="37" meta:word-count="607" meta:character-count="3193" meta:non-whitespace-character-count="2654"/>
    <meta:template xlink:type="simple" xlink:actuate="onRequest" xlink:title="default" xlink:href="../../../../../AppData/Roaming/LibreOffice/4/user/template/default1.ott" meta:date="2026-02-05T07:49:12.519240100"/>
  </office:meta>
</office:document-meta>
</file>