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Regular" svg:font-family="LiberationSans-Regular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3.2035in" fo:margin-left="2.2715in" table:align="left"/>
    </style:style>
    <style:style style:name="Table2.A" style:family="table-column">
      <style:table-column-properties style:column-width="3.2035in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3.466in" fo:margin-left="2.1361in" table:align="left"/>
    </style:style>
    <style:style style:name="Table3.A" style:family="table-column">
      <style:table-column-properties style:column-width="3.466in"/>
    </style:style>
    <style:style style:name="Table3.A1" style:family="table-cell">
      <style:table-cell-properties fo:padding="0.0382in" fo:border-left="0.5pt solid #000000" fo:border-right="0.5pt solid #000000" fo:border-top="0.5pt solid #000000" fo:border-bottom="none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Standard">
      <style:text-properties style:font-name="Liberation Sans" officeooo:rsid="00004656" officeooo:paragraph-rsid="00004656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00ea53" officeooo:paragraph-rsid="0000ea53"/>
    </style:style>
    <style:style style:name="P4" style:family="paragraph" style:parent-style-name="Text_20_body">
      <style:text-properties style:font-name="Liberation Sans" officeooo:rsid="00004656" officeooo:paragraph-rsid="00004656"/>
    </style:style>
    <style:style style:name="P5" style:family="paragraph" style:parent-style-name="Text_20_body">
      <style:text-properties fo:font-variant="normal" fo:text-transform="none" fo:color="#000000" loext:opacity="100%" style:font-name="LiberationSans-Regular" fo:font-size="12pt" fo:letter-spacing="normal" fo:font-style="normal" fo:font-weight="normal" officeooo:paragraph-rsid="00004656"/>
    </style:style>
    <style:style style:name="P6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  <style:text-properties fo:font-variant="normal" fo:text-transform="none" fo:color="#000000" loext:opacity="100%" style:font-name="LiberationSans-Regular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  <style:text-properties style:font-name="LiberationSans-Regular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070aae" officeooo:paragraph-rsid="00070aae"/>
    </style:style>
    <style:style style:name="P9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  <style:text-properties style:font-name="Liberation Sans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background-color="#ffff00" loext:char-shading-value="0"/>
    </style:style>
    <style:style style:name="T4" style:family="text">
      <style:text-properties style:text-position="super 58%" officeooo:rsid="0000ea53"/>
    </style:style>
    <style:style style:name="T5" style:family="text">
      <style:text-properties fo:font-style="italic"/>
    </style:style>
    <style:style style:name="T6" style:family="text">
      <style:text-properties fo:font-variant="normal" fo:text-transform="none" fo:color="#217dba" loext:opacity="100%" style:font-name="Liberation Sans" fo:font-size="12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color="#127630" loext:opacity="100%"/>
    </style:style>
    <style:style style:name="T8" style:family="text">
      <style:text-properties fo:background-color="#f7f305" loext:char-shading-value="0"/>
    </style:style>
    <style:style style:name="T9" style:family="text">
      <style:text-properties fo:font-variant="normal" fo:text-transform="none" fo:color="#127630" loext:opacity="100%" fo:font-size="12pt" fo:letter-spacing="normal" fo:font-style="normal" fo:font-weight="normal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fo:background-color="#f7f305" loext:char-shading-value="0"/>
    </style:style>
    <style:style style:name="T12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0046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1 John 2:1-2</text:span><text:line-break/><text:span text:style-name="T2">1</text:span> My little children, these things write I unto you, that ye sin not. And if any man sin, we have <text:span text:style-name="T3">an advocate</text:span><text:span text:style-name="T4">G3875</text:span> with the Father, Jesus Christ the righteous: <text:line-break/><text:span text:style-name="T2">2</text:span> And he is the propitiation for our sins: and not for ours only, but also for <text:span text:style-name="T5">the sins of</text:span> the whole world.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G3875 (appears 5 times in 5 verses)</text:p>
          </table:table-cell>
        </table:table-row>
      </table:table>
      <text:p text:style-name="P4"><text:a xlink:type="simple" xlink:href="popverse://bible+av/Joh_14:16" text:style-name="Internet_20_link" text:visited-style-name="Visited_20_Internet_20_Link"><text:span text:style-name="T6"/></text:a></text:p>
      <text:p text:style-name="P5"><text:span text:style-name="T7">Joh 14:16</text:span> And I will pray the Father, and he shall give you another <text:span text:style-name="T8">Comforter</text:span>, that he may abide with you for ever;</text:p>
      <text:p text:style-name="P6"><text:span text:style-name="T7">Joh 14:26</text:span> But <text:span text:style-name="T8">the Comforter</text:span>, which is the Holy Ghost, whom the Father will send in my name, he shall teach you all things, and bring all things to your remembrance, whatsoever I have said unto you.</text:p>
      <text:p text:style-name="P6"><text:span text:style-name="T7">Joh 15:26</text:span> But when <text:span text:style-name="T8">the Comforter</text:span> is come, whom I will send unto you from the Father, even the Spirit of truth, which proceedeth from the Father, he shall testify of me:</text:p>
      <text:p text:style-name="P6"><text:span text:style-name="T7">Joh 16:7</text:span> Nevertheless I tell you the truth; It is expedient for you that I go away: for if I go not away<text:span text:style-name="T8">, the Comforter</text:span> will not come unto you; but if I depart, I will send him unto you.</text:p>
      <text:p text:style-name="P7"><text:span text:style-name="T9">1Jo 2:1</text:span><text:span text:style-name="T10"> My little children, these things write I unto you, that ye sin not. And if any man sin, we have </text:span><text:span text:style-name="T11">an advocate</text:span><text:span text:style-name="T10"> with the Father, Jesus Christ the righteous:</text:span></text:p>
      <text:p text:style-name="P7"><text:span text:style-name="T12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Summary of G3875</text:p>
          </table:table-cell>
        </table:table-row>
        <table:table-row>
          <table:table-cell table:style-name="Table3.A2" office:value-type="string">
            <text:p text:style-name="P8">Comforter, the Comforter (x3), an advocate</text:p>
          </table:table-cell>
        </table:table-row>
      </table:table>
      <text:p text:style-name="P9"><text:span text:style-name="T10"/></text:p>
      <text:p text:style-name="P9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Regular" svg:font-family="LiberationSans-Regular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4T06:43:53.149000000</meta:creation-date>
    <meta:editing-cycles>10</meta:editing-cycles>
    <meta:editing-duration>PT20M59S</meta:editing-duration>
    <dc:date>2026-07-11T12:31:38.388296566</dc:date>
    <meta:generator>LibreOffice/26.2.4.2$Linux_X86_64 LibreOffice_project/64a984c51f4702dbd3710b13428c673a2f1292e7</meta:generator>
    <meta:document-statistic meta:table-count="3" meta:image-count="0" meta:object-count="0" meta:page-count="1" meta:paragraph-count="9" meta:word-count="235" meta:character-count="1200" meta:non-whitespace-character-count="973"/>
  </office:meta>
</office:document-meta>
</file>