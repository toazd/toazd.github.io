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311in"/>
    </style:style>
    <style:style style:name="co2" style:family="table-column">
      <style:table-column-properties fo:break-before="auto" style:column-width="2.480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922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611in" fo:break-before="auto" style:use-optimal-row-height="false"/>
    </style:style>
    <style:style style:name="ro10" style:family="table-row">
      <style:table-row-properties style:row-height="0.6008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 fo:padding="0.028in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fo:padding="0.0346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padding="0.0346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padding="0.028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74pt solid #000000" fo:border-left="none" fo:padding="0.0346in" fo:border-right="none" fo:border-top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0.74pt solid #000000" fo:padding="0.028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order-left="none" fo:padding="0.028in" fo:border-right="none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wrap-option="wrap" fo:border="0.74pt solid #000000" fo:padding="0.028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wrap-option="wrap" fo:border-left="none" fo:padding="0.028in" fo:border-right="none" fo:border-top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fo:padding="0.028in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="0.74pt solid #000000" fo:padding="0.0346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padding="0.0346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74pt solid #000000" style:text-align-source="fix" style:repeat-content="false" fo:border-left="none" fo:padding="0.028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style:text-position="super 58%"/>
    </style:style>
    <style:style style:name="T4" style:family="text">
      <style:text-properties fo:font-size="11pt" style:font-size-asian="11pt" style:font-size-complex="11pt" fo:font-weight="bold" style:font-weight-asian="bold" style:font-weight-complex="bold"/>
    </style:style>
    <style:style style:name="T5" style:family="text">
      <style:text-properties fo:font-size="11pt" style:font-size-asian="11pt" style:font-size-complex="11pt" fo:font-weight="bold" style:font-weight-asian="bold" style:font-weight-complex="bold"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16381" table:default-cell-style-name="ce22"/>
        <table:table-row table:style-name="ro1">
          <table:table-cell table:style-name="ce4" office:value-type="string" calcext:value-type="string" table:number-columns-spanned="3" table:number-rows-spanned="1">
            <text:p><text:span text:style-name="T1">Zechariah 1:21</text:span></text:p>
            <text:p><text:span text:style-name="T2">Then said</text:span><text:span text:style-name="T3">H559</text:span><text:span text:style-name="T2"> I, What come</text:span><text:span text:style-name="T3">H935</text:span><text:span text:style-name="T2"> these to do</text:span><text:span text:style-name="T3">H6213</text:span><text:span text:style-name="T2"> ? And he spake</text:span><text:span text:style-name="T3">H559</text:span><text:span text:style-name="T2"> , saying</text:span><text:span text:style-name="T3">H559</text:span><text:span text:style-name="T2"> , These are the horns</text:span><text:span text:style-name="T3">H7161</text:span><text:span text:style-name="T2"> which have scattered</text:span><text:span text:style-name="T3">H2219</text:span><text:span text:style-name="T2"> Judah</text:span><text:span text:style-name="T3">H3063</text:span><text:span text:style-name="T2"> , so that</text:span><text:span text:style-name="T3">H6310</text:span><text:span text:style-name="T2"> no man</text:span><text:span text:style-name="T3">H376</text:span><text:span text:style-name="T2"> did lift up</text:span><text:span text:style-name="T3">H5375</text:span><text:span text:style-name="T2"> his head</text:span><text:span text:style-name="T3">H7218</text:span><text:span text:style-name="T2"> : but these are come</text:span><text:span text:style-name="T3">H935</text:span><text:span text:style-name="T2"> </text:span><text:span text:style-name="T4">to fray</text:span><text:span text:style-name="T5">H2729</text:span><text:span text:style-name="T2"> them, to cast out</text:span><text:span text:style-name="T3">H3034</text:span><text:span text:style-name="T2"> the horns</text:span><text:span text:style-name="T3">H7161</text:span><text:span text:style-name="T2"> of the Gentiles</text:span><text:span text:style-name="T3">H1471</text:span><text:span text:style-name="T2"> , which lifted up</text:span><text:span text:style-name="T3">H5375</text:span><text:span text:style-name="T2"> their horn</text:span><text:span text:style-name="T3">H7161</text:span><text:span text:style-name="T2"> over the land</text:span><text:span text:style-name="T3">H776</text:span><text:span text:style-name="T2"> of Judah</text:span><text:span text:style-name="T3">H3063</text:span><text:span text:style-name="T2"> to scatter</text:span><text:span text:style-name="T3">H2219</text:span><text:span text:style-name="T2"> it.</text:span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3" table:number-rows-spanned="1">
            <text:p>Zechariah 1:21 (fray) H2729 charad (khaw-rad’)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7"/>
          <table:table-cell table:number-columns-repeated="16383"/>
        </table:table-row>
        <table:table-row table:style-name="ro4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Verses</text:p>
          </table:table-cell>
          <table:table-cell table:style-name="ce30" office:value-type="string" calcext:value-type="string">
            <text:p>Count</text:p>
          </table:table-cell>
          <table:table-cell table:number-columns-repeated="16381"/>
        </table:table-row>
        <table:table-row table:style-name="ro5">
          <table:table-cell table:style-name="ce17"/>
          <table:table-cell table:style-name="ce23"/>
          <table:table-cell table:style-name="ce31"/>
          <table:table-cell table:number-columns-repeated="16381"/>
        </table:table-row>
        <table:table-row table:style-name="ro6">
          <table:table-cell table:style-name="ce18" office:value-type="string" calcext:value-type="string">
            <text:p>now unto her, Behold, thou hast been <text:span text:style-name="T6">careful</text:span></text:p>
          </table:table-cell>
          <table:table-cell table:style-name="ce24" office:value-type="string" calcext:value-type="string">
            <text:p>2 Kng 4: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6381"/>
        </table:table-row>
        <table:table-row table:style-name="ro7">
          <table:table-cell table:style-name="ce20"/>
          <table:table-cell table:style-name="ce25"/>
          <table:table-cell table:style-name="ce33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<text:span text:style-name="T6">discomfited</text:span></text:p>
          </table:table-cell>
          <table:table-cell table:style-name="ce24" office:value-type="string" calcext:value-type="string">
            <text:p>Jdg 8: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20"/>
          <table:table-cell table:style-name="ce25"/>
          <table:table-cell table:style-name="ce33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the whole mount <text:span text:style-name="T6">quaked</text:span></text:p>
          </table:table-cell>
          <table:table-cell table:style-name="ce24" office:value-type="string" calcext:value-type="string">
            <text:p>Exo 19:1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20"/>
          <table:table-cell table:style-name="ce25"/>
          <table:table-cell table:style-name="ce33"/>
          <table:table-cell table:number-columns-repeated="16381"/>
        </table:table-row>
        <table:table-row table:style-name="ro6">
          <table:table-cell table:style-name="ce18" office:value-type="string" calcext:value-type="string">
            <text:p>to <text:span text:style-name="T6">fray</text:span></text:p>
          </table:table-cell>
          <table:table-cell table:style-name="ce24" office:value-type="string" calcext:value-type="string">
            <text:p>Zec 1:21</text:p>
          </table:table-cell>
          <table:table-cell table:style-name="ce32" office:value-type="float" office:value="3" calcext:value-type="float" table:number-columns-spanned="1" table:number-rows-spanned="3">
            <text:p>3</text:p>
          </table:table-cell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no man shall <text:span text:style-name="T6">fray</text:span> them away.</text:p>
          </table:table-cell>
          <table:table-cell table:style-name="ce24" office:value-type="string" calcext:value-type="string">
            <text:p>Deu 28:26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; and none shall <text:span text:style-name="T6">fray</text:span> them away.</text:p>
          </table:table-cell>
          <table:table-cell table:style-name="ce24" office:value-type="string" calcext:value-type="string">
            <text:p>Jer 7:33</text:p>
          </table:table-cell>
          <table:covered-table-cell table:style-name="ce32"/>
          <table:table-cell table:number-columns-repeated="16381"/>
        </table:table-row>
        <table:table-row table:style-name="ro3">
          <table:table-cell table:style-name="ce20"/>
          <table:table-cell table:style-name="ce25"/>
          <table:table-cell table:style-name="ce33"/>
          <table:table-cell table:number-columns-repeated="16381"/>
        </table:table-row>
        <table:table-row table:style-name="ro8">
          <table:table-cell table:style-name="ce21" office:value-type="string" calcext:value-type="string">
            <text:p>tremble</text:p>
          </table:table-cell>
          <table:table-cell table:style-name="ce26" office:value-type="string" calcext:value-type="string">
            <text:p>Isa 32:11</text:p>
            <text:p>Eze 26:18</text:p>
          </table:table-cell>
          <table:table-cell table:style-name="ce32" office:value-type="float" office:value="13" calcext:value-type="float" table:number-columns-spanned="1" table:number-rows-spanned="9">
            <text:p>13</text:p>
          </table:table-cell>
          <table:table-cell table:number-columns-repeated="16381"/>
        </table:table-row>
        <table:table-row table:style-name="ro6">
          <table:table-cell table:style-name="ce21" office:value-type="string" calcext:value-type="string">
            <text:p>trembleth</text:p>
          </table:table-cell>
          <table:table-cell table:style-name="ce24" office:value-type="string" calcext:value-type="string">
            <text:p>Job 37:1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him <text:span text:style-name="T6">trembling</text:span></text:p>
          </table:table-cell>
          <table:table-cell table:style-name="ce24" office:value-type="string" calcext:value-type="string">
            <text:p>1 Sam 13:7</text:p>
          </table:table-cell>
          <table:covered-table-cell table:style-name="ce32"/>
          <table:table-cell table:number-columns-repeated="16381"/>
        </table:table-row>
        <table:table-row table:style-name="ro9">
          <table:table-cell table:style-name="ce21" office:value-type="string" calcext:value-type="string">
            <text:p>trembled</text:p>
          </table:table-cell>
          <table:table-cell table:style-name="ce26" office:value-type="string" calcext:value-type="string">
            <text:p>Gen 27:33</text:p>
            <text:p>Exo 19:16</text:p>
            <text:p>1 Sam 16:4, 28:5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they also <text:span text:style-name="T6">trembled</text:span></text:p>
          </table:table-cell>
          <table:table-cell table:style-name="ce26" office:value-type="string" calcext:value-type="string">
            <text:p>1 Sam 14:15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shall <text:span text:style-name="T6">tremble</text:span></text:p>
          </table:table-cell>
          <table:table-cell table:style-name="ce26" office:value-type="string" calcext:value-type="string">
            <text:p>Eze 26:16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; and they shall <text:span text:style-name="T6">tremble</text:span></text:p>
          </table:table-cell>
          <table:table-cell table:style-name="ce26" office:value-type="string" calcext:value-type="string">
            <text:p>Eze 32:10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shall <text:span text:style-name="T6">tremble</text:span></text:p>
          </table:table-cell>
          <table:table-cell table:style-name="ce26" office:value-type="string" calcext:value-type="string">
            <text:p>Hos 11:10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They shall <text:span text:style-name="T6">tremble</text:span></text:p>
          </table:table-cell>
          <table:table-cell table:style-name="ce26" office:value-type="string" calcext:value-type="string">
            <text:p>Hos 11:11</text:p>
          </table:table-cell>
          <table:covered-table-cell table:style-name="ce32"/>
          <table:table-cell table:number-columns-repeated="16381"/>
        </table:table-row>
        <table:table-row table:style-name="ro3">
          <table:table-cell table:style-name="ce20"/>
          <table:table-cell table:style-name="ce27"/>
          <table:table-cell table:style-name="ce33"/>
          <table:table-cell table:number-columns-repeated="16381"/>
        </table:table-row>
        <table:table-row table:style-name="ro10">
          <table:table-cell table:style-name="ce21" office:value-type="string" calcext:value-type="string">
            <text:p>afraid</text:p>
          </table:table-cell>
          <table:table-cell table:style-name="ce28" office:value-type="string" calcext:value-type="string">
            <text:p>Eze 30:9</text:p>
            <text:p>Amo 3:6</text:p>
            <text:p>Mic 4:4</text:p>
          </table:table-cell>
          <table:table-cell table:style-name="ce32" office:value-type="float" office:value="22" calcext:value-type="float" table:number-columns-spanned="1" table:number-rows-spanned="14">
            <text:p>22</text:p>
          </table:table-cell>
          <table:table-cell table:number-columns-repeated="16381"/>
        </table:table-row>
        <table:table-row table:style-name="ro6">
          <table:table-cell table:style-name="ce18" office:value-type="string" calcext:value-type="string">
            <text:p>not be <text:span text:style-name="T6">afraid</text:span></text:p>
          </table:table-cell>
          <table:table-cell table:style-name="ce28" office:value-type="string" calcext:value-type="string">
            <text:p>Amo 3:6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was <text:span text:style-name="T6">afraid</text:span></text:p>
          </table:table-cell>
          <table:table-cell table:style-name="ce29" office:value-type="string" calcext:value-type="string">
            <text:p>Rth 3:8, 1 Sam 21:1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is <text:span text:style-name="T6">afraid</text:span></text:p>
          </table:table-cell>
          <table:table-cell table:style-name="ce29" office:value-type="string" calcext:value-type="string">
            <text:p>Isa 10:29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<text:span text:style-name="T7">them, and they were </text:span><text:span text:style-name="T6">afraid</text:span></text:p>
          </table:table-cell>
          <table:table-cell table:style-name="ce29" office:value-type="string" calcext:value-type="string">
            <text:p>Gen 42:28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: and it shall be <text:span text:style-name="T6">afraid</text:span></text:p>
          </table:table-cell>
          <table:table-cell table:style-name="ce29" office:value-type="string" calcext:value-type="string">
            <text:p>Isa 19:16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none shall make him <text:span text:style-name="T6">afraid</text:span></text:p>
          </table:table-cell>
          <table:table-cell table:style-name="ce29" office:value-type="string" calcext:value-type="string">
            <text:p>Jer 30:10, 46:27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none shall make thee <text:span text:style-name="T6">afraid</text:span></text:p>
          </table:table-cell>
          <table:table-cell table:style-name="ce29" office:value-type="string" calcext:value-type="string">
            <text:p>Job 11:19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none shall make you <text:span text:style-name="T6">afraid</text:span></text:p>
          </table:table-cell>
          <table:table-cell table:style-name="ce29" office:value-type="string" calcext:value-type="string">
            <text:p>Lev 26:6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none shall make them <text:span text:style-name="T6">afraid</text:span></text:p>
          </table:table-cell>
          <table:table-cell table:style-name="ce29" office:value-type="string" calcext:value-type="string">
            <text:p>Isa 17:2, Eze 34:28, Zep 3:13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; and none shall make them <text:span text:style-name="T6">afraid</text:span></text:p>
          </table:table-cell>
          <table:table-cell table:style-name="ce29" office:value-type="string" calcext:value-type="string">
            <text:p>Mic 4:4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none made them <text:span text:style-name="T6">afraid</text:span></text:p>
          </table:table-cell>
          <table:table-cell table:style-name="ce29" office:value-type="string" calcext:value-type="string">
            <text:p>Eze 39:26, Nah 2:11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, and will make him <text:span text:style-name="T6">afraid</text:span></text:p>
          </table:table-cell>
          <table:table-cell table:style-name="ce29" office:value-type="string" calcext:value-type="string">
            <text:p>2 Sam 17:2</text:p>
          </table:table-cell>
          <table:covered-table-cell table:style-name="ce32"/>
          <table:table-cell table:number-columns-repeated="16381"/>
        </table:table-row>
        <table:table-row table:style-name="ro6">
          <table:table-cell table:style-name="ce18" office:value-type="string" calcext:value-type="string">
            <text:p>were <text:span text:style-name="T6">afraid</text:span></text:p>
          </table:table-cell>
          <table:table-cell table:style-name="ce29" office:value-type="string" calcext:value-type="string">
            <text:p>1 Kng 1:49, Isa 41:5</text:p>
          </table:table-cell>
          <table:covered-table-cell table:style-name="ce32"/>
          <table:table-cell table:number-columns-repeated="16381"/>
        </table:table-row>
        <table:table-row table:style-name="ro11">
          <table:table-cell table:number-columns-repeated="2"/>
          <table:table-cell table:style-name="ce7" table:formula="of:=SUM([.C6:.C39])" office:value-type="float" office:value="41" calcext:value-type="float">
            <text:p>41</text:p>
          </table:table-cell>
          <table:table-cell table:number-columns-repeated="16381"/>
        </table:table-row>
        <table:table-row table:style-name="ro11" table:number-rows-repeated="1048535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4:Sheet1.C2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7:19:19.321727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5:23:30.227714623</meta:creation-date>
    <meta:generator>LibreOffice/24.2.4.2$Linux_X86_64 LibreOffice_project/420$Build-2</meta:generator>
    <dc:date>2024-07-24T17:37:55.712162147</dc:date>
    <meta:editing-duration>PT1H30M56S</meta:editing-duration>
    <meta:editing-cycles>119</meta:editing-cycles>
    <meta:print-date>2024-07-24T17:36:21.695849620</meta:print-date>
    <meta:document-statistic meta:table-count="1" meta:cell-count="70" meta:object-count="0"/>
  </office:meta>
</office:document-meta>
</file>