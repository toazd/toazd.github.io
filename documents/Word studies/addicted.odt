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2.8958in" fo:margin-left="2.2625in" table:align="left"/>
    </style:style>
    <style:style style:name="Table2.A" style:family="table-column">
      <style:table-column-properties style:column-width="2.8958in"/>
    </style:style>
    <style:style style:name="Table2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Table_20_Contents">
      <style:text-properties style:font-name="Liberation Sans" officeooo:paragraph-rsid="00079ec6"/>
    </style:style>
    <style:style style:name="P2" style:family="paragraph" style:parent-style-name="Standard">
      <style:text-properties style:font-name="Liberation Sans" officeooo:rsid="0006f99e" officeooo:paragraph-rsid="0006f99e"/>
    </style:style>
    <style:style style:name="P3" style:family="paragraph" style:parent-style-name="Standard">
      <style:text-properties style:font-name="Liberation Sans" officeooo:rsid="0008f5b4" officeooo:paragraph-rsid="002d6067"/>
    </style:style>
    <style:style style:name="P4" style:family="paragraph" style:parent-style-name="Standard">
      <style:text-properties style:font-name="Liberation Sans" officeooo:rsid="0008f5b4" officeooo:paragraph-rsid="0008f5b4"/>
    </style:style>
    <style:style style:name="P5" style:family="paragraph" style:parent-style-name="Table_20_Contents">
      <style:text-properties style:font-name="Liberation Sans" officeooo:rsid="000dd82a" officeooo:paragraph-rsid="000dd82a"/>
    </style:style>
    <style:style style:name="P6" style:family="paragraph" style:parent-style-name="Text_20_body">
      <style:text-properties style:font-name="Liberation Sans" officeooo:paragraph-rsid="0008f5b4"/>
    </style:style>
    <style:style style:name="P7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314ce5" officeooo:paragraph-rsid="00314ce5"/>
    </style:style>
    <style:style style:name="P9" style:family="paragraph" style:parent-style-name="Table_20_Contents">
      <style:paragraph-properties fo:text-align="left" style:justify-single-word="false"/>
      <style:text-properties style:font-name="Liberation Sans" officeooo:rsid="002f8166" officeooo:paragraph-rsid="002f8166"/>
    </style:style>
    <style:style style:name="P10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/>
    </style:style>
    <style:style style:name="P11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 officeooo:paragraph-rsid="004acb87"/>
    </style:style>
    <style:style style:name="P12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 officeooo:paragraph-rsid="001e554b"/>
    </style:style>
    <style:style style:name="P13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 officeooo:paragraph-rsid="003f5f83"/>
    </style:style>
    <style:style style:name="P14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rsid="0027d824" officeooo:paragraph-rsid="003f5f83"/>
    </style:style>
    <style:style style:name="P15" style:family="paragraph" style:parent-style-name="Table_20_Contents">
      <style:paragraph-properties fo:text-align="left" style:justify-single-word="false"/>
      <style:text-properties fo:color="#127622" loext:opacity="100%" style:font-name="Liberation Sans" officeooo:paragraph-rsid="0022fd70"/>
    </style:style>
    <style:style style:name="P16" style:family="paragraph" style:parent-style-name="Table_20_Contents">
      <style:paragraph-properties fo:text-align="left" style:justify-single-word="false"/>
      <style:text-properties style:font-name="Liberation Sans" officeooo:paragraph-rsid="0022fd70"/>
    </style:style>
    <style:style style:name="P17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 officeooo:rsid="001e554b" officeooo:paragraph-rsid="001e554b"/>
    </style:style>
    <style:style style:name="P18" style:family="paragraph" style:parent-style-name="Table_20_Contents">
      <style:paragraph-properties fo:text-align="left" style:justify-single-word="false"/>
      <style:text-properties style:font-name="Liberation Sans"/>
    </style:style>
    <style:style style:name="P19" style:family="paragraph" style:parent-style-name="Table_20_Contents">
      <style:paragraph-properties fo:text-align="left" style:justify-single-word="false"/>
      <style:text-properties style:font-name="Liberation Sans" officeooo:paragraph-rsid="003c27a8" fo:background-color="transparent"/>
    </style:style>
    <style:style style:name="P20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 officeooo:rsid="0027d824" officeooo:paragraph-rsid="003f5f83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style:text-position="super 58%" officeooo:rsid="000bf303" fo:background-color="transparent" loext:char-shading-value="0"/>
    </style:style>
    <style:style style:name="T6" style:family="text">
      <style:text-properties fo:font-style="italic"/>
    </style:style>
    <style:style style:name="T7" style:family="text">
      <style:text-properties officeooo:rsid="00287af2"/>
    </style:style>
    <style:style style:name="T8" style:family="text">
      <style:text-properties officeooo:rsid="000ae1f3"/>
    </style:style>
    <style:style style:name="T9" style:family="text">
      <style:text-properties officeooo:rsid="002ac615"/>
    </style:style>
    <style:style style:name="T10" style:family="text">
      <style:text-properties officeooo:rsid="002d6067"/>
    </style:style>
    <style:style style:name="T11" style:family="text">
      <style:text-properties officeooo:rsid="0059af77"/>
    </style:style>
    <style:style style:name="T12" style:family="text">
      <style:text-properties fo:font-style="italic" officeooo:rsid="000ae1f3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0ae1f3" style:font-style-asian="italic" style:font-style-complex="italic"/>
    </style:style>
    <style:style style:name="T14" style:family="text">
      <style:text-properties officeooo:rsid="002da2f4"/>
    </style:style>
    <style:style style:name="T15" style:family="text">
      <style:text-properties officeooo:rsid="002b9f59"/>
    </style:style>
    <style:style style:name="T16" style:family="text">
      <style:text-properties officeooo:rsid="0041036e"/>
    </style:style>
    <style:style style:name="T17" style:family="text">
      <style:text-properties officeooo:rsid="000b95fd"/>
    </style:style>
    <style:style style:name="T18" style:family="text">
      <style:text-properties officeooo:rsid="000bf303"/>
    </style:style>
    <style:style style:name="T19" style:family="text">
      <style:text-properties fo:font-variant="normal" fo:text-transform="none" fo:color="#217dba" loext:opacity="100%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 officeooo:rsid="0008f5b4"/>
    </style:style>
    <style:style style:name="T21" style:family="text">
      <style:text-properties fo:font-variant="normal" fo:text-transform="none" fo:color="#000000" loext:opacity="100%" fo:font-size="12pt" fo:letter-spacing="normal" fo:font-style="normal" fo:font-weight="normal" officeooo:rsid="0008f5b4" fo:background-color="#f7f305" loext:char-shading-value="0"/>
    </style:style>
    <style:style style:name="T22" style:family="text">
      <style:text-properties fo:font-variant="normal" fo:text-transform="none" fo:color="#217dba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00000" loext:opacity="100%" style:font-name="Liberation Sans" fo:font-size="12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Liberation Sans" fo:font-size="12pt" fo:letter-spacing="normal" fo:font-style="normal" fo:font-weight="normal" fo:background-color="#f7f305" loext:char-shading-value="0"/>
    </style:style>
    <style:style style:name="T25" style:family="text">
      <style:text-properties officeooo:rsid="00426f08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officeooo:rsid="001e554b"/>
    </style:style>
    <style:style style:name="T28" style:family="text">
      <style:text-properties fo:font-variant="normal" fo:text-transform="none" fo:color="#000000" loext:opacity="100%" fo:font-size="12pt" fo:letter-spacing="normal" fo:font-style="normal" fo:font-weight="normal" officeooo:rsid="00218fc1"/>
    </style:style>
    <style:style style:name="T29" style:family="text">
      <style:text-properties fo:font-variant="normal" fo:text-transform="none" fo:color="#000000" loext:opacity="100%" fo:font-size="12pt" fo:letter-spacing="normal" fo:font-style="normal" fo:font-weight="normal" officeooo:rsid="0024912a"/>
    </style:style>
    <style:style style:name="T30" style:family="text">
      <style:text-properties fo:font-variant="normal" fo:text-transform="none" fo:color="#000000" loext:opacity="100%" fo:font-size="12pt" fo:letter-spacing="normal" fo:font-style="normal" fo:font-weight="normal" officeooo:rsid="0026b12c"/>
    </style:style>
    <style:style style:name="T31" style:family="text">
      <style:text-properties fo:font-variant="normal" fo:text-transform="none" fo:color="#000000" loext:opacity="100%" fo:font-size="12pt" fo:letter-spacing="normal" fo:font-style="normal" fo:font-weight="normal" officeooo:rsid="0049c420"/>
    </style:style>
    <style:style style:name="T32" style:family="text">
      <style:text-properties fo:font-variant="normal" fo:text-transform="none" fo:color="#000000" loext:opacity="100%" fo:font-size="12pt" fo:letter-spacing="normal" fo:font-style="normal" fo:font-weight="normal" officeooo:rsid="001f47b5"/>
    </style:style>
    <style:style style:name="T33" style:family="text">
      <style:text-properties fo:font-variant="normal" fo:text-transform="none" fo:color="#000000" loext:opacity="100%" fo:font-size="12pt" fo:letter-spacing="normal" fo:font-style="normal" fo:font-weight="normal" officeooo:rsid="00204941"/>
    </style:style>
    <style:style style:name="T34" style:family="text">
      <style:text-properties fo:font-variant="normal" fo:text-transform="none" fo:color="#127622" loext:opacity="100%" fo:font-size="12pt" fo:letter-spacing="normal" fo:font-style="normal" fo:font-weight="normal" officeooo:rsid="00204941"/>
    </style:style>
    <style:style style:name="T35" style:family="text">
      <style:text-properties fo:font-variant="normal" fo:text-transform="none" fo:color="#000000" loext:opacity="100%" fo:font-size="12pt" fo:letter-spacing="normal" fo:font-style="normal" fo:font-weight="normal" officeooo:rsid="00273a93"/>
    </style:style>
    <style:style style:name="T36" style:family="text">
      <style:text-properties fo:font-variant="normal" fo:text-transform="none" fo:color="#000000" loext:opacity="100%" fo:font-size="12pt" fo:letter-spacing="normal" fo:font-style="normal" fo:font-weight="normal" officeooo:rsid="00340ccf"/>
    </style:style>
    <style:style style:name="T37" style:family="text">
      <style:text-properties fo:font-variant="normal" fo:text-transform="none" fo:color="#000000" loext:opacity="100%" fo:font-size="12pt" fo:letter-spacing="normal" fo:font-style="normal" fo:font-weight="normal" officeooo:rsid="0035c3e0"/>
    </style:style>
    <style:style style:name="T38" style:family="text">
      <style:text-properties fo:font-variant="normal" fo:text-transform="none" fo:color="#000000" loext:opacity="100%" fo:font-size="12pt" fo:letter-spacing="normal" fo:font-style="normal" fo:font-weight="normal" officeooo:rsid="005ab38d"/>
    </style:style>
    <style:style style:name="T39" style:family="text">
      <style:text-properties fo:font-variant="normal" fo:text-transform="none" fo:color="#000000" loext:opacity="100%" fo:font-size="12pt" fo:letter-spacing="normal" fo:font-style="normal" fo:font-weight="normal" officeooo:rsid="005b4a6e"/>
    </style:style>
    <style:style style:name="T40" style:family="text">
      <style:text-properties fo:font-variant="normal" fo:text-transform="none" fo:color="#000000" loext:opacity="100%" fo:font-size="12pt" fo:letter-spacing="normal" fo:font-style="normal" fo:font-weight="normal" officeooo:rsid="00377016"/>
    </style:style>
    <style:style style:name="T41" style:family="text">
      <style:text-properties fo:font-variant="normal" fo:text-transform="none" fo:color="#127622" loext:opacity="100%" fo:font-size="12pt" fo:letter-spacing="normal" fo:font-style="normal" fo:font-weight="normal" officeooo:rsid="00377016"/>
    </style:style>
    <style:style style:name="T42" style:family="text">
      <style:text-properties fo:font-variant="normal" fo:text-transform="none" fo:color="#000000" loext:opacity="100%" fo:font-size="12pt" fo:letter-spacing="normal" fo:font-style="normal" fo:font-weight="normal" officeooo:rsid="004acb87"/>
    </style:style>
    <style:style style:name="T43" style:family="text">
      <style:text-properties fo:font-variant="normal" fo:text-transform="none" fo:color="#000000" loext:opacity="100%" fo:font-size="12pt" fo:letter-spacing="normal" fo:font-style="normal" fo:font-weight="normal" officeooo:rsid="004b6a16"/>
    </style:style>
    <style:style style:name="T44" style:family="text">
      <style:text-properties fo:font-variant="normal" fo:text-transform="none" fo:color="#000000" loext:opacity="100%" fo:font-size="12pt" fo:letter-spacing="normal" fo:font-style="normal" fo:font-weight="normal" officeooo:rsid="0044f1d8"/>
    </style:style>
    <style:style style:name="T45" style:family="text">
      <style:text-properties fo:font-variant="normal" fo:text-transform="none" fo:color="#000000" loext:opacity="100%" fo:font-size="12pt" fo:letter-spacing="normal" fo:font-style="normal" fo:font-weight="normal" officeooo:rsid="0027d824"/>
    </style:style>
    <style:style style:name="T46" style:family="text">
      <style:text-properties fo:font-variant="normal" fo:text-transform="none" fo:color="#127622" loext:opacity="100%" fo:font-size="12pt" fo:letter-spacing="normal" fo:font-style="normal" fo:font-weight="normal" officeooo:rsid="0027d824"/>
    </style:style>
    <style:style style:name="T47" style:family="text">
      <style:text-properties fo:font-variant="normal" fo:text-transform="none" fo:color="#000000" loext:opacity="100%" fo:font-size="12pt" fo:letter-spacing="normal" fo:font-style="normal" fo:font-weight="normal" officeooo:rsid="0037a48f"/>
    </style:style>
    <style:style style:name="T48" style:family="text">
      <style:text-properties fo:font-variant="normal" fo:text-transform="none" fo:color="#000000" loext:opacity="100%" fo:font-size="12pt" fo:letter-spacing="normal" fo:font-style="normal" fo:font-weight="normal" officeooo:rsid="003ab330"/>
    </style:style>
    <style:style style:name="T49" style:family="text">
      <style:text-properties fo:font-variant="normal" fo:text-transform="none" fo:color="#000000" loext:opacity="100%" fo:font-size="12pt" fo:letter-spacing="normal" fo:font-style="normal" fo:font-weight="normal" officeooo:rsid="004ce817"/>
    </style:style>
    <style:style style:name="T50" style:family="text">
      <style:text-properties fo:font-variant="normal" fo:text-transform="none" fo:color="#000000" loext:opacity="100%" fo:font-size="12pt" fo:letter-spacing="normal" fo:font-style="normal" fo:font-weight="normal" officeooo:rsid="001f797a"/>
    </style:style>
    <style:style style:name="T51" style:family="text">
      <style:text-properties fo:font-variant="normal" fo:text-transform="none" fo:color="#000000" loext:opacity="100%" fo:font-size="12pt" fo:letter-spacing="normal" fo:font-style="normal" fo:font-weight="normal" officeooo:rsid="003afac4"/>
    </style:style>
    <style:style style:name="T52" style:family="text">
      <style:text-properties fo:font-variant="normal" fo:text-transform="none" fo:color="#000000" loext:opacity="100%" fo:font-size="12pt" fo:letter-spacing="normal" fo:font-style="normal" fo:font-weight="normal" officeooo:rsid="0048df4e"/>
    </style:style>
    <style:style style:name="T53" style:family="text">
      <style:text-properties fo:font-variant="normal" fo:text-transform="none" fo:color="#000000" loext:opacity="100%" fo:font-size="12pt" fo:letter-spacing="normal" fo:font-style="normal" fo:font-weight="normal" officeooo:rsid="003fa984"/>
    </style:style>
    <style:style style:name="T54" style:family="text">
      <style:text-properties fo:font-variant="normal" fo:text-transform="none" fo:color="#000000" loext:opacity="100%" fo:font-size="12pt" fo:letter-spacing="normal" fo:font-style="normal" fo:font-weight="normal" officeooo:rsid="004db6de"/>
    </style:style>
    <style:style style:name="T55" style:family="text">
      <style:text-properties fo:font-variant="normal" fo:text-transform="none" fo:color="#000000" loext:opacity="100%" fo:font-size="12pt" fo:letter-spacing="normal" fo:font-style="normal" fo:font-weight="normal" officeooo:rsid="004e2dda"/>
    </style:style>
    <style:style style:name="T56" style:family="text">
      <style:text-properties fo:font-variant="normal" fo:text-transform="none" fo:color="#127622" loext:opacity="100%" fo:font-size="12pt" fo:letter-spacing="normal" fo:font-style="normal" fo:font-weight="normal" officeooo:rsid="004e2dda"/>
    </style:style>
    <style:style style:name="T57" style:family="text">
      <style:text-properties fo:font-variant="normal" fo:text-transform="none" fo:color="#127622" loext:opacity="100%" fo:font-size="12pt" fo:letter-spacing="normal" fo:font-style="normal" fo:font-weight="normal" officeooo:rsid="0051bee9"/>
    </style:style>
    <style:style style:name="T58" style:family="text">
      <style:text-properties fo:font-variant="normal" fo:text-transform="none" fo:color="#127622" loext:opacity="100%" fo:font-size="12pt" fo:letter-spacing="normal" fo:font-style="normal" fo:font-weight="normal" officeooo:rsid="004f64e4"/>
    </style:style>
    <style:style style:name="T59" style:family="text">
      <style:text-properties fo:font-variant="normal" fo:text-transform="none" fo:color="#127622" loext:opacity="100%" fo:font-size="12pt" fo:letter-spacing="normal" fo:font-style="normal" fo:font-weight="normal" officeooo:rsid="00515b90"/>
    </style:style>
    <style:style style:name="T60" style:family="text">
      <style:text-properties fo:font-variant="normal" fo:text-transform="none" fo:color="#000000" loext:opacity="100%" fo:font-size="12pt" fo:letter-spacing="normal" fo:font-style="normal" fo:font-weight="normal" officeooo:rsid="00579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1 Corinthians 16:15-16</text:span><text:line-break/><text:span text:style-name="T2">15</text:span> I beseech you, brethren, (ye know the house of Stephanas, that it is the firstfruits of Achaia, and <text:span text:style-name="T3">that</text:span><text:span text:style-name="T4"> they have addicted</text:span><text:span text:style-name="T5">G5021</text:span> themselves to the ministry of the saints,) <text:line-break/><text:span text:style-name="T2">16</text:span> That ye submit yourselves unto such, and to every one that helpeth with <text:span text:style-name="T6">us</text:span>, and laboureth.</text:p>
          </table:table-cell>
        </table:table-row>
      </table:table>
      <text:p text:style-name="P2"/>
      <text:p text:style-name="P3">What <text:span text:style-name="T7">is </text:span><text:span text:style-name="T8">the first thought that </text:span>comes to mind when you read the word “addicted”?</text:p>
      <text:p text:style-name="P3"/>
      <text:p text:style-name="P3"><text:span text:style-name="T8">Unless you’ve studied this word carefully, </text:span><text:span text:style-name="T9">which </text:span><text:span text:style-name="T10">is </text:span><text:span text:style-name="T11">one </text:span><text:span text:style-name="T10">among the 4,002 unique words that appear</text:span><text:span text:style-name="T9"> only once in the Bible,</text:span><text:span text:style-name="T8"> you will likely get the meaning wrong. The </text:span><text:span text:style-name="T10">context</text:span><text:span text:style-name="T8"> gives us a clue in the phrase “</text:span><text:span text:style-name="T12">that ye </text:span><text:span text:style-name="T13">submit</text:span><text:span text:style-name="T12"> yourselves unto such</text:span><text:span text:style-name="T8">” but there </text:span><text:span text:style-name="T14">is more </text:span><text:span text:style-name="T15">understanding </text:span><text:span text:style-name="T14">to be gleaned </text:span><text:span text:style-name="T16">if we are willing to work at it</text:span><text:span text:style-name="T17">. </text:span><text:span text:style-name="T18">To do that, we will look at every occurrence of the same Strong’s number that corresponds to “that they have addicted” which is G5021.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G5021 (appears 8 times in 8 verses)</text:p>
          </table:table-cell>
        </table:table-row>
      </table:table>
      <text:p text:style-name="P6"><text:span text:style-name="T19"/></text:p>
      <text:p text:style-name="P6"><text:span text:style-name="T19">Mat 28:16</text:span><text:span text:style-name="T20"> Then the eleven disciples went away into Galilee, into a mountain where Jesus </text:span><text:span text:style-name="T21">had appointed</text:span><text:span text:style-name="T20"> them.</text:span></text:p>
      <text:p text:style-name="P7"><text:a xlink:type="simple" xlink:href="popverse://bible+av/Luk_7:8" text:style-name="Internet_20_link" text:visited-style-name="Visited_20_Internet_20_Link"><text:span text:style-name="T22">Luk 7:8</text:span></text:a><text:span text:style-name="T23"> For I also am a man </text:span><text:span text:style-name="T24">set</text:span><text:span text:style-name="T23"> under authority, having under me soldiers, and I say unto one, Go, and he goeth; and to another, Come, and he cometh; and to my servant, Do this, and he doeth it.</text:span></text:p>
      <text:p text:style-name="P7"><text:a xlink:type="simple" xlink:href="popverse://bible+av/Act_13:48" text:style-name="Internet_20_link" text:visited-style-name="Visited_20_Internet_20_Link"><text:span text:style-name="T22">Act 13:48</text:span></text:a><text:span text:style-name="T23"> And when the Gentiles heard this, they were glad, and glorified the word of the Lord: and as many as were </text:span><text:span text:style-name="T24">ordained</text:span><text:span text:style-name="T23"> to eternal life believed.</text:span></text:p>
      <text:p text:style-name="P7"><text:a xlink:type="simple" xlink:href="popverse://bible+av/Act_15:2" text:style-name="Internet_20_link" text:visited-style-name="Visited_20_Internet_20_Link"><text:span text:style-name="T22">Act 15:2</text:span></text:a><text:span text:style-name="T23"> When therefore Paul and Barnabas had no small dissension and disputation with them</text:span><text:span text:style-name="T24">, they determined</text:span><text:span text:style-name="T23"> that Paul and Barnabas, and certain other of them, should go up to Jerusalem unto the apostles and elders about this question.</text:span></text:p>
      <text:p text:style-name="P7"><text:a xlink:type="simple" xlink:href="popverse://bible+av/Act_22:10" text:style-name="Internet_20_link" text:visited-style-name="Visited_20_Internet_20_Link"><text:span text:style-name="T22">Act 22:10</text:span></text:a><text:span text:style-name="T23"> And I said, What shall I do, Lord? And the Lord said unto me, Arise, and go into Damascus; and there it shall be told thee of all things which </text:span><text:span text:style-name="T24">are appointed</text:span><text:span text:style-name="T23"> for thee to do.</text:span></text:p>
      <text:p text:style-name="P7"><text:a xlink:type="simple" xlink:href="popverse://bible+av/Act_28:23" text:style-name="Internet_20_link" text:visited-style-name="Visited_20_Internet_20_Link"><text:span text:style-name="T22">Act 28:23</text:span></text:a><text:span text:style-name="T23"> And </text:span><text:span text:style-name="T24">when they had appointed</text:span><text:span text:style-name="T23"> him a day, there came many to him into his lodging; to whom he expounded and testified the kingdom of God, persuading them concerning Jesus, both out of the law of Moses, and out of the prophets, from morning till evening.</text:span></text:p>
      <text:p text:style-name="P7"><text:a xlink:type="simple" xlink:href="popverse://bible+av/Rom_13:1" text:style-name="Internet_20_link" text:visited-style-name="Visited_20_Internet_20_Link"><text:span text:style-name="T22">Rom 13:1</text:span></text:a><text:span text:style-name="T23"> Let every soul be subject unto the higher powers. For there is no power but of God: the powers that be are </text:span><text:span text:style-name="T24">ordained</text:span><text:span text:style-name="T23"> of God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Summary of G5021</text:p>
          </table:table-cell>
        </table:table-row>
        <table:table-row>
          <table:table-cell table:style-name="Table5.A2" office:value-type="string">
            <text:p text:style-name="P9"><text:span text:style-name="T25">h</text:span>ad appointed, set, ordained (x2), they determined, are appointed, when they had appointed, addicted</text:p>
          </table:table-cell>
        </table:table-row>
      </table:table>
      <text:p text:style-name="P10"><text:span text:style-name="T26"/></text:p>
      <text:p text:style-name="P11"><text:span text:style-name="T27">The Corinthians are being urgently implored to submit themselves to who? The house of Stephanos </text:span><text:span text:style-name="T28">and every one that helpeth with us, </text:span><text:span text:style-name="T29">and laboureth </text:span><text:span text:style-name="T30">[</text:span><text:span text:style-name="T29">to the ministry of the saints</text:span><text:span text:style-name="T30">]</text:span><text:span text:style-name="T27">. Why? Because they have determined that they have been set/ordained/appointed a </text:span><text:span text:style-name="T31">position</text:span><text:span text:style-name="T27"> </text:span><text:span text:style-name="T32">alongside Paul</text:span><text:span text:style-name="T33"> (</text:span><text:span text:style-name="T34">2Cor 10:8</text:span><text:span text:style-name="T33">) </text:span><text:span text:style-name="T35">for </text:span><text:span text:style-name="T36">the </text:span><text:span text:style-name="T35">work of ministering to the saints (that is, serving </text:span><text:span text:style-name="T37">and</text:span><text:span text:style-name="T35"> edifying the body of Christ). </text:span><text:span text:style-name="T38">The fact that those servants were the first fruits </text:span><text:span text:style-name="T39">in that region</text:span><text:span text:style-name="T38"> is telling in and of itself but that’s a separate Bible study. </text:span><text:span text:style-name="T40">Ministers of the body of Christ are held in high regard (</text:span><text:span text:style-name="T41">Mat 20:25-28</text:span><text:span text:style-name="T40">) </text:span><text:span text:style-name="T42">and the Corinthians are</text:span><text:span text:style-name="T43"> entreated</text:span><text:span text:style-name="T42"> to submit themselves to them</text:span><text:span text:style-name="T44">.</text:span></text:p>
      <text:p text:style-name="P12"><text:span text:style-name="T40"/></text:p>
      <text:p text:style-name="P13"><text:soft-page-break/><text:span text:style-name="T35">M</text:span><text:span text:style-name="T45">an has within him the sinful tendency to want to rule over everyone else and there doesn’t seem to be a limit to what lengths they will go to accomplish this evil (eg. </text:span><text:span text:style-name="T46">Judges 9:1-5</text:span><text:span text:style-name="T45">). </text:span><text:span text:style-name="T40">Men </text:span><text:span text:style-name="T47">have strove with each other since Cain &amp; Abel in vain for glory that </text:span><text:span text:style-name="T48">could</text:span><text:span text:style-name="T47"> never satisfy </text:span><text:span text:style-name="T49">or be blessed.</text:span></text:p>
      <text:p text:style-name="P14">God’s word teaches us that we should not only submit ourselves to each other but also to those who are “set” above us in positions of authority, and their ordinances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1 Peter 5:5</text:p>
            <text:p text:style-name="P16">Likewise, ye younger, submit yourselves unto the elder. Yea, <text:span text:style-name="T4">all of you be subject one to another</text:span>, and be clothed with humility: for God resisteth the proud, and giveth grace to the humble.</text:p>
          </table:table-cell>
        </table:table-row>
      </table:table>
      <text:p text:style-name="P17"><text:span text:style-name="T50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span text:style-name="T1">1 Peter 2:13-19</text:span><text:line-break/><text:span text:style-name="T2">13</text:span> <text:span text:style-name="T4">Submit yourselves to every ordinance of man</text:span> for the Lord's sake: whether it be <text:span text:style-name="T4">to the king</text:span>, as supreme; <text:line-break/><text:span text:style-name="T2">14</text:span> Or <text:span text:style-name="T4">unto governors</text:span>, as <text:span text:style-name="T4">unto them that are sent by him</text:span> for the punishment of evildoers, and for the praise of them that do well. <text:line-break/><text:span text:style-name="T2">15</text:span> <text:span text:style-name="T4">For so is the will of God</text:span>, that with well doing ye may put to silence the ignorance of foolish men: <text:line-break/><text:span text:style-name="T2">16</text:span> As free, and not using <text:span text:style-name="T6">your</text:span> liberty for a cloke of maliciousness, but <text:span text:style-name="T4">as the servants of God</text:span>. <text:line-break/><text:span text:style-name="T2">17</text:span> Honour all <text:span text:style-name="T6">men</text:span>. Love the brotherhood. Fear God. Honour the king. <text:line-break/><text:span text:style-name="T2">18</text:span> Servants, <text:span text:style-name="T3">be</text:span><text:span text:style-name="T4"> subject to </text:span><text:span text:style-name="T3">your</text:span><text:span text:style-name="T4"> masters</text:span> with all fear; <text:span text:style-name="T4">not only to the good and gentle, but also to the froward.</text:span> <text:line-break/><text:span text:style-name="T2">19</text:span> For this <text:span text:style-name="T6">is</text:span> thankworthy, if a man for conscience toward God endure grief, suffering wrongfully.</text:p>
          </table:table-cell>
        </table:table-row>
      </table:table>
      <text:p text:style-name="P17"><text:span text:style-name="T50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9"><text:span text:style-name="T1">Romans 13:1-4</text:span><text:line-break/><text:span text:style-name="T2">1</text:span> Let every soul be subject unto the higher powers. For there is no power but of God: <text:span text:style-name="T4">the powers that be are ordained of God.</text:span> <text:line-break/><text:span text:style-name="T2">2</text:span> Whosoever therefore resisteth the power, resisteth the ordinance of God: and they that resist shall receive to themselves damnation. <text:line-break/><text:span text:style-name="T2">3</text:span> For rulers are not a terror to good works, but to the evil. Wilt thou then not be afraid of the power? do that which is good, and thou shalt have praise of the same: <text:line-break/><text:span text:style-name="T2">4</text:span> <text:span text:style-name="T4">For he is the minister of God to thee for good.</text:span> But if thou do that which is evil, be afraid; for he beareth not the sword in vain: for <text:span text:style-name="T4">he is the minister of God</text:span>, a revenger to <text:span text:style-name="T6">execute</text:span> wrath upon him that doeth evil.</text:p>
          </table:table-cell>
        </table:table-row>
      </table:table>
      <text:p text:style-name="P17"><text:span text:style-name="T50"/></text:p>
      <text:p text:style-name="P20"><text:span text:style-name="T51">In doing </text:span><text:span text:style-name="T52">so, </text:span><text:span text:style-name="T53">as we have been commanded</text:span><text:span text:style-name="T51">, we follow in the footsteps of the author and finisher of our faith </text:span><text:span text:style-name="T54">by taking</text:span><text:span text:style-name="T51"> on the form of a servant </text:span><text:span text:style-name="T55">(</text:span><text:span text:style-name="T56">Mat 20:</text:span><text:span text:style-name="T57">26-</text:span><text:span text:style-name="T56">28</text:span><text:span text:style-name="T55">, </text:span><text:span text:style-name="T58">Mar 10:</text:span><text:span text:style-name="T59">43-</text:span><text:span text:style-name="T58">45</text:span><text:span text:style-name="T60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3T13:12:21.596000000</meta:creation-date>
    <meta:editing-cycles>84</meta:editing-cycles>
    <meta:editing-duration>PT6H49M17S</meta:editing-duration>
    <dc:date>2026-07-11T12:31:37.939923600</dc:date>
    <meta:generator>LibreOffice/26.2.4.2$Linux_X86_64 LibreOffice_project/64a984c51f4702dbd3710b13428c673a2f1292e7</meta:generator>
    <meta:document-statistic meta:table-count="6" meta:image-count="0" meta:object-count="0" meta:page-count="2" meta:paragraph-count="21" meta:word-count="947" meta:character-count="5116" meta:non-whitespace-character-count="4180"/>
  </office:meta>
</office:document-meta>
</file>