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7in" table:align="margins"/>
    </style:style>
    <style:style style:name="Table5.A" style:family="table-column">
      <style:table-column-properties style:column-width="7.7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7.7in" table:align="margins"/>
    </style:style>
    <style:style style:name="Table4.A" style:family="table-column">
      <style:table-column-properties style:column-width="7.7in" style:rel-column-width="65535*"/>
    </style:style>
    <style:style style:name="Table4.A1" style:family="table-cell">
      <style:table-cell-properties fo:padding="0.0382in" fo:border="0.5pt solid #000000"/>
    </style:style>
    <style:style style:name="Table2" style:family="table">
      <style:table-properties style:width="7.7in" table:align="margins"/>
    </style:style>
    <style:style style:name="Table2.A" style:family="table-column">
      <style:table-column-properties style:column-width="7.7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7in" table:align="margins"/>
    </style:style>
    <style:style style:name="Table7.A" style:family="table-column">
      <style:table-column-properties style:column-width="3.85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7in" table:align="margins"/>
    </style:style>
    <style:style style:name="Table8.A" style:family="table-column">
      <style:table-column-properties style:column-width="7.7in" style:rel-column-width="65535*"/>
    </style:style>
    <style:style style:name="Table8.A1" style:family="table-cell">
      <style:table-cell-properties fo:padding="0.0382in" fo:border="0.5pt solid #000000"/>
    </style:style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7in" table:align="margins"/>
    </style:style>
    <style:style style:name="Table6.A" style:family="table-column">
      <style:table-column-properties style:column-width="7.7in" style:rel-column-width="65535*"/>
    </style:style>
    <style:style style:name="Table6.A1" style:family="table-cell">
      <style:table-cell-properties fo:padding="0.0382in" fo:border="0.5pt solid #000000"/>
    </style:style>
    <style:style style:name="Table9" style:family="table">
      <style:table-properties style:width="7.7in" table:align="margins"/>
    </style:style>
    <style:style style:name="Table9.A" style:family="table-column">
      <style:table-column-properties style:column-width="7.7in" style:rel-column-width="65535*"/>
    </style:style>
    <style:style style:name="Table9.A1" style:family="table-cell">
      <style:table-cell-properties fo:padding="0.0382in" fo:border="0.5pt solid #000000"/>
    </style:style>
    <style:style style:name="Table11" style:family="table">
      <style:table-properties style:width="7.7in" table:align="margins"/>
    </style:style>
    <style:style style:name="Table11.A" style:family="table-column">
      <style:table-column-properties style:column-width="7.7in" style:rel-column-width="65535*"/>
    </style:style>
    <style:style style:name="Table1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7.7in" table:align="margins"/>
    </style:style>
    <style:style style:name="Table13.A" style:family="table-column">
      <style:table-column-properties style:column-width="7.7in" style:rel-column-width="65535*"/>
    </style:style>
    <style:style style:name="Table13.A1" style:family="table-cell">
      <style:table-cell-properties fo:padding="0.0382in" fo:border="0.5pt solid #000000"/>
    </style:style>
    <style:style style:name="Table16" style:family="table">
      <style:table-properties style:width="7.7in" table:align="margins"/>
    </style:style>
    <style:style style:name="Table16.A" style:family="table-column">
      <style:table-column-properties style:column-width="7.7in" style:rel-column-width="65535*"/>
    </style:style>
    <style:style style:name="Table16.A1" style:family="table-cell">
      <style:table-cell-properties fo:padding="0.0382in" fo:border="0.5pt solid #000000"/>
    </style:style>
    <style:style style:name="Table15" style:family="table">
      <style:table-properties style:width="7.7in" table:align="margins"/>
    </style:style>
    <style:style style:name="Table15.A" style:family="table-column">
      <style:table-column-properties style:column-width="7.7in" style:rel-column-width="65535*"/>
    </style:style>
    <style:style style:name="Table15.A1" style:family="table-cell">
      <style:table-cell-properties fo:padding="0.0382in" fo:border="0.5pt solid #000000"/>
    </style:style>
    <style:style style:name="Table17" style:family="table">
      <style:table-properties style:width="7.7in" table:align="margins"/>
    </style:style>
    <style:style style:name="Table17.A" style:family="table-column">
      <style:table-column-properties style:column-width="7.7in" style:rel-column-width="65535*"/>
    </style:style>
    <style:style style:name="Table17.A1" style:family="table-cell">
      <style:table-cell-properties fo:padding="0.0382in" fo:border="0.5pt solid #000000"/>
    </style:style>
    <style:style style:name="Table3" style:family="table">
      <style:table-properties style:width="7.7542in" fo:margin-left="0.0375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4.566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7917in" fo:margin-left="-0.0042in" table:align="left"/>
    </style:style>
    <style:style style:name="Table10.A" style:family="table-column">
      <style:table-column-properties style:column-width="7.7917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7in" table:align="margins"/>
    </style:style>
    <style:style style:name="Table12.A" style:family="table-column">
      <style:table-column-properties style:column-width="7.7in" style:rel-column-width="65535*"/>
    </style:style>
    <style:style style:name="Table12.A1" style:family="table-cell">
      <style:table-cell-properties fo:padding="0.0382in" fo:border="0.5pt solid #000000"/>
    </style:style>
    <style:style style:name="Table14" style:family="table">
      <style:table-properties style:width="7.7in" table:align="margins"/>
    </style:style>
    <style:style style:name="Table14.A" style:family="table-column">
      <style:table-column-properties style:column-width="7.7in" style:rel-column-width="65535*"/>
    </style:style>
    <style:style style:name="Table14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Liberation Sans" fo:font-size="13pt" officeooo:rsid="0004dfc0" officeooo:paragraph-rsid="0004dfc0" style:font-size-asian="13pt" style:font-name-complex="Liberation Sans" style:font-size-complex="13pt"/>
    </style:style>
    <style:style style:name="P2" style:family="paragraph" style:parent-style-name="Standard">
      <style:text-properties style:font-name="Liberation Sans" fo:font-size="13pt" officeooo:rsid="0004dfc0" officeooo:paragraph-rsid="002958fc" style:font-size-asian="13pt" style:font-name-complex="Liberation Sans" style:font-size-complex="13pt"/>
    </style:style>
    <style:style style:name="P3" style:family="paragraph" style:parent-style-name="Standard">
      <style:text-properties style:font-name="Liberation Sans" fo:font-size="13pt" officeooo:rsid="000ad30a" officeooo:paragraph-rsid="000ad30a" style:font-size-asian="13pt" style:font-name-complex="Liberation Sans" style:font-size-complex="13pt"/>
    </style:style>
    <style:style style:name="P4" style:family="paragraph" style:parent-style-name="Standard">
      <style:text-properties style:font-name="Liberation Sans" fo:font-size="13pt" officeooo:rsid="00300dc1" officeooo:paragraph-rsid="00300dc1" style:font-size-asian="13pt" style:font-name-complex="Liberation Sans" style:font-size-complex="13pt"/>
    </style:style>
    <style:style style:name="P5" style:family="paragraph" style:parent-style-name="Table_20_Contents">
      <style:text-properties style:font-name="Liberation Sans" fo:font-size="13pt" officeooo:paragraph-rsid="000cb47d" style:font-size-asian="13pt" style:font-name-complex="Liberation Sans" style:font-size-complex="13pt"/>
    </style:style>
    <style:style style:name="P6" style:family="paragraph" style:parent-style-name="Table_20_Contents">
      <style:text-properties style:font-name="Liberation Sans" fo:font-size="13pt" officeooo:paragraph-rsid="000ad30a" style:font-size-asian="13pt" style:font-name-complex="Liberation Sans" style:font-size-complex="13pt"/>
    </style:style>
    <style:style style:name="P7" style:family="paragraph" style:parent-style-name="Table_20_Contents">
      <style:text-properties fo:color="#127622" loext:opacity="100%" style:font-name="Liberation Sans" fo:font-size="13pt" fo:font-weight="bold" officeooo:paragraph-rsid="000cb47d" style:font-size-asian="13pt" style:font-weight-asian="bold" style:font-name-complex="Liberation Sans" style:font-size-complex="13pt" style:font-weight-complex="bold"/>
    </style:style>
    <style:style style:name="P8" style:family="paragraph" style:parent-style-name="Table_20_Contents">
      <style:text-properties fo:color="#127622" loext:opacity="100%" style:font-name="Liberation Sans" fo:font-size="13pt" fo:font-weight="bold" officeooo:paragraph-rsid="000ad30a" style:font-size-asian="13pt" style:font-weight-asian="bold" style:font-name-complex="Liberation Sans" style:font-size-complex="13pt" style:font-weight-complex="bold"/>
    </style:style>
    <style:style style:name="P9" style:family="paragraph" style:parent-style-name="Table_20_Contents">
      <style:text-properties fo:color="#127622" loext:opacity="100%" style:font-name="Liberation Sans" fo:font-size="13pt" fo:font-weight="bold" officeooo:paragraph-rsid="00300dc1" style:font-size-asian="13pt" style:font-weight-asian="bold" style:font-name-complex="Liberation Sans" style:font-size-complex="13pt" style:font-weight-complex="bold"/>
    </style:style>
    <style:style style:name="P10" style:family="paragraph" style:parent-style-name="Table_20_Contents">
      <style:text-properties fo:color="#127622" loext:opacity="100%" style:font-name="Liberation Sans" fo:font-size="13pt" fo:font-weight="bold" officeooo:paragraph-rsid="0036d329" style:font-size-asian="13pt" style:font-weight-asian="bold" style:font-name-complex="Liberation Sans" style:font-size-complex="13pt" style:font-weight-complex="bold"/>
    </style:style>
    <style:style style:name="P11" style:family="paragraph" style:parent-style-name="Table_20_Contents">
      <style:text-properties fo:color="#ff0000" loext:opacity="100%" style:font-name="Liberation Sans" fo:font-size="13pt" officeooo:paragraph-rsid="00300dc1" style:font-size-asian="13pt" style:font-name-complex="Liberation Sans" style:font-size-complex="13pt"/>
    </style:style>
    <style:style style:name="P12" style:family="paragraph" style:parent-style-name="Table_20_Contents">
      <style:text-properties fo:color="#ff0000" loext:opacity="100%" style:font-name="Liberation Sans" fo:font-size="13pt" fo:font-weight="normal" officeooo:paragraph-rsid="0036d329" style:font-size-asian="13pt" style:font-weight-asian="normal" style:font-name-complex="Liberation Sans" style:font-size-complex="13pt" style:font-weight-complex="normal"/>
    </style:style>
    <style:style style:name="P13" style:family="paragraph" style:parent-style-name="Standard">
      <style:text-properties style:font-name="Liberation Sans" fo:font-size="13pt" officeooo:rsid="00052e07" officeooo:paragraph-rsid="009046e9" style:font-size-asian="13pt" style:font-name-complex="Liberation Sans" style:font-size-complex="13pt"/>
    </style:style>
    <style:style style:name="P14" style:family="paragraph" style:parent-style-name="Standard">
      <style:text-properties style:font-name="Liberation Sans" fo:font-size="13pt" officeooo:rsid="00052e07" officeooo:paragraph-rsid="00ea021a" style:font-size-asian="13pt" style:font-name-complex="Liberation Sans" style:font-size-complex="13pt"/>
    </style:style>
    <style:style style:name="P15" style:family="paragraph" style:parent-style-name="Standard">
      <style:text-properties style:font-name="Liberation Sans" fo:font-size="13pt" officeooo:rsid="0004dfc0" officeooo:paragraph-rsid="0004dfc0" style:font-size-asian="13pt" style:font-name-complex="Liberation Sans" style:font-size-complex="13pt"/>
    </style:style>
    <style:style style:name="P16" style:family="paragraph" style:parent-style-name="Standard">
      <style:text-properties style:font-name="Liberation Sans" fo:font-size="13pt" officeooo:rsid="0004dfc0" officeooo:paragraph-rsid="0090d6a6" style:font-size-asian="13pt" style:font-name-complex="Liberation Sans" style:font-size-complex="13pt"/>
    </style:style>
    <style:style style:name="P17" style:family="paragraph" style:parent-style-name="Standard">
      <style:text-properties style:font-name="Liberation Sans" fo:font-size="13pt" officeooo:rsid="0010eed6" officeooo:paragraph-rsid="004aac4f" style:font-size-asian="13pt" style:font-name-complex="Liberation Sans" style:font-size-complex="13pt"/>
    </style:style>
    <style:style style:name="P18" style:family="paragraph" style:parent-style-name="Standard">
      <style:text-properties style:font-name="Liberation Sans" fo:font-size="13pt" officeooo:rsid="000ad30a" officeooo:paragraph-rsid="000ad30a" style:font-size-asian="13pt" style:font-name-complex="Liberation Sans" style:font-size-complex="13pt"/>
    </style:style>
    <style:style style:name="P19" style:family="paragraph" style:parent-style-name="Standard">
      <style:text-properties style:font-name="Liberation Sans" fo:font-size="13pt" officeooo:rsid="004df884" officeooo:paragraph-rsid="004df884" style:font-size-asian="13pt" style:font-name-complex="Liberation Sans" style:font-size-complex="13pt"/>
    </style:style>
    <style:style style:name="P20" style:family="paragraph" style:parent-style-name="Standard">
      <style:text-properties style:font-name="Liberation Sans" fo:font-size="13pt" officeooo:rsid="002c2cab" officeooo:paragraph-rsid="004ef68d" style:font-size-asian="13pt" style:font-name-complex="Liberation Sans" style:font-size-complex="13pt"/>
    </style:style>
    <style:style style:name="P21" style:family="paragraph" style:parent-style-name="Standard">
      <style:text-properties style:font-name="Liberation Sans" fo:font-size="13pt" officeooo:rsid="004fc82f" officeooo:paragraph-rsid="004fc82f" style:font-size-asian="13pt" style:font-name-complex="Liberation Sans" style:font-size-complex="13pt"/>
    </style:style>
    <style:style style:name="P22" style:family="paragraph" style:parent-style-name="Standard">
      <style:text-properties style:font-name="Liberation Sans" fo:font-size="13pt" officeooo:rsid="00300dc1" officeooo:paragraph-rsid="00300dc1" style:font-size-asian="13pt" style:font-name-complex="Liberation Sans" style:font-size-complex="13pt"/>
    </style:style>
    <style:style style:name="P23" style:family="paragraph" style:parent-style-name="Standard">
      <style:text-properties style:font-name="Liberation Sans" fo:font-size="13pt" officeooo:rsid="00300dc1" officeooo:paragraph-rsid="005b08ec" style:font-size-asian="13pt" style:font-name-complex="Liberation Sans" style:font-size-complex="13pt"/>
    </style:style>
    <style:style style:name="P24" style:family="paragraph" style:parent-style-name="Standard">
      <style:text-properties style:font-name="Liberation Sans" fo:font-size="13pt" officeooo:rsid="00564b78" officeooo:paragraph-rsid="00d3280c" style:font-size-asian="13pt" style:font-name-complex="Liberation Sans" style:font-size-complex="13pt"/>
    </style:style>
    <style:style style:name="P25" style:family="paragraph" style:parent-style-name="Standard">
      <style:text-properties style:font-name="Liberation Sans" fo:font-size="13pt" officeooo:rsid="0039b3f7" officeooo:paragraph-rsid="005b08ec" style:font-size-asian="13pt" style:font-name-complex="Liberation Sans" style:font-size-complex="13pt"/>
    </style:style>
    <style:style style:name="P26" style:family="paragraph" style:parent-style-name="Standard">
      <style:text-properties style:font-name="Liberation Sans" fo:font-size="13pt" officeooo:rsid="0039b3f7" officeooo:paragraph-rsid="008b85c7" style:font-size-asian="13pt" style:font-name-complex="Liberation Sans" style:font-size-complex="13pt"/>
    </style:style>
    <style:style style:name="P27" style:family="paragraph" style:parent-style-name="Standard">
      <style:text-properties style:font-name="Liberation Sans" fo:font-size="13pt" officeooo:rsid="0039b3f7" officeooo:paragraph-rsid="00a44ad6" style:font-size-asian="13pt" style:font-name-complex="Liberation Sans" style:font-size-complex="13pt"/>
    </style:style>
    <style:style style:name="P28" style:family="paragraph" style:parent-style-name="Standard">
      <style:text-properties style:font-name="Liberation Sans" fo:font-size="13pt" officeooo:rsid="005e2045" officeooo:paragraph-rsid="00a44ad6" style:font-size-asian="13pt" style:font-name-complex="Liberation Sans" style:font-size-complex="13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3pt" officeooo:rsid="005fa49d" officeooo:paragraph-rsid="00a44ad6" style:font-size-asian="13pt" style:font-name-complex="Liberation Sans" style:font-size-complex="13pt"/>
    </style:style>
    <style:style style:name="P30" style:family="paragraph" style:parent-style-name="Standard">
      <style:text-properties style:font-name="Liberation Sans" fo:font-size="13pt" officeooo:rsid="005fa49d" officeooo:paragraph-rsid="00a44ad6" style:font-size-asian="13pt" style:font-name-complex="Liberation Sans" style:font-size-complex="13pt"/>
    </style:style>
    <style:style style:name="P31" style:family="paragraph" style:parent-style-name="Standard">
      <style:text-properties style:font-name="Liberation Sans" fo:font-size="13pt" officeooo:rsid="0067368c" officeooo:paragraph-rsid="002958fc" style:font-size-asian="13pt" style:font-name-complex="Liberation Sans" style:font-size-complex="13pt"/>
    </style:style>
    <style:style style:name="P32" style:family="paragraph" style:parent-style-name="Standard">
      <style:text-properties style:font-name="Liberation Sans" fo:font-size="13pt" officeooo:rsid="0072a1e5" officeooo:paragraph-rsid="0072a1e5" style:font-size-asian="13pt" style:font-name-complex="Liberation Sans" style:font-size-complex="13pt"/>
    </style:style>
    <style:style style:name="P33" style:family="paragraph" style:parent-style-name="Standard">
      <style:text-properties style:font-name="Liberation Sans" fo:font-size="13pt" officeooo:rsid="00803d37" officeooo:paragraph-rsid="009046e9" style:font-size-asian="13pt" style:font-name-complex="Liberation Sans" style:font-size-complex="13pt"/>
    </style:style>
    <style:style style:name="P34" style:family="paragraph" style:parent-style-name="Standard">
      <style:text-properties style:font-name="Liberation Sans" fo:font-size="13pt" officeooo:rsid="0080b1a6" officeooo:paragraph-rsid="008d9c09" style:font-size-asian="13pt" style:font-name-complex="Liberation Sans" style:font-size-complex="13pt"/>
    </style:style>
    <style:style style:name="P35" style:family="paragraph" style:parent-style-name="Standard">
      <style:text-properties style:font-name="Liberation Sans" fo:font-size="13pt" officeooo:rsid="00863202" officeooo:paragraph-rsid="0090d6a6" style:font-size-asian="13pt" style:font-name-complex="Liberation Sans" style:font-size-complex="13pt"/>
    </style:style>
    <style:style style:name="P36" style:family="paragraph" style:parent-style-name="Standard" style:list-style-name="L2">
      <style:text-properties style:font-name="Liberation Sans" fo:font-size="13pt" officeooo:rsid="0090d6a6" officeooo:paragraph-rsid="0090d6a6" style:font-size-asian="13pt" style:font-name-complex="Liberation Sans" style:font-size-complex="13pt"/>
    </style:style>
    <style:style style:name="P37" style:family="paragraph" style:parent-style-name="Standard" style:list-style-name="L2">
      <style:text-properties style:font-name="Liberation Sans" fo:font-size="13pt" officeooo:rsid="00924a4c" officeooo:paragraph-rsid="00924a4c" style:font-size-asian="13pt" style:font-name-complex="Liberation Sans" style:font-size-complex="13pt"/>
    </style:style>
    <style:style style:name="P38" style:family="paragraph" style:parent-style-name="Standard">
      <style:text-properties style:font-name="Liberation Sans" fo:font-size="13pt" officeooo:rsid="0092b165" officeooo:paragraph-rsid="0092b165" style:font-size-asian="13pt" style:font-name-complex="Liberation Sans" style:font-size-complex="13pt"/>
    </style:style>
    <style:style style:name="P39" style:family="paragraph" style:parent-style-name="Standard" style:list-style-name="L3">
      <style:text-properties style:font-name="Liberation Sans" fo:font-size="13pt" officeooo:rsid="009518de" officeooo:paragraph-rsid="009518de" style:font-size-asian="13pt" style:font-name-complex="Liberation Sans" style:font-size-complex="13pt"/>
    </style:style>
    <style:style style:name="P40" style:family="paragraph" style:parent-style-name="Standard" style:list-style-name="L3">
      <style:text-properties style:font-name="Liberation Sans" fo:font-size="13pt" officeooo:rsid="0095ec6f" officeooo:paragraph-rsid="0095ec6f" style:font-size-asian="13pt" style:font-name-complex="Liberation Sans" style:font-size-complex="13pt"/>
    </style:style>
    <style:style style:name="P41" style:family="paragraph" style:parent-style-name="Standard" style:list-style-name="L3">
      <style:text-properties style:font-name="Liberation Sans" fo:font-size="13pt" officeooo:rsid="009a513c" officeooo:paragraph-rsid="009a513c" style:font-size-asian="13pt" style:font-name-complex="Liberation Sans" style:font-size-complex="13pt"/>
    </style:style>
    <style:style style:name="P42" style:family="paragraph" style:parent-style-name="Standard" style:list-style-name="L3">
      <style:text-properties style:font-name="Liberation Sans" fo:font-size="13pt" officeooo:rsid="009af2fe" officeooo:paragraph-rsid="009af2fe" style:font-size-asian="13pt" style:font-name-complex="Liberation Sans" style:font-size-complex="13pt"/>
    </style:style>
    <style:style style:name="P43" style:family="paragraph" style:parent-style-name="Standard" style:list-style-name="L3">
      <style:text-properties style:font-name="Liberation Sans" fo:font-size="13pt" officeooo:rsid="009c2897" officeooo:paragraph-rsid="009c2897" style:font-size-asian="13pt" style:font-name-complex="Liberation Sans" style:font-size-complex="13pt"/>
    </style:style>
    <style:style style:name="P44" style:family="paragraph" style:parent-style-name="Standard" style:list-style-name="L3">
      <style:text-properties style:font-name="Liberation Sans" fo:font-size="13pt" officeooo:rsid="009dfc6e" officeooo:paragraph-rsid="00e69ac7" style:font-size-asian="13pt" style:font-name-complex="Liberation Sans" style:font-size-complex="13pt"/>
    </style:style>
    <style:style style:name="P45" style:family="paragraph" style:parent-style-name="Standard">
      <style:text-properties style:font-name="Liberation Sans" fo:font-size="13pt" officeooo:rsid="00ae3e12" officeooo:paragraph-rsid="00ae3e12" style:font-size-asian="13pt" style:font-name-complex="Liberation Sans" style:font-size-complex="13pt"/>
    </style:style>
    <style:style style:name="P46" style:family="paragraph" style:parent-style-name="Standard">
      <style:text-properties style:font-name="Liberation Sans" fo:font-size="13pt" officeooo:rsid="00ae3e12" officeooo:paragraph-rsid="00ea021a" style:font-size-asian="13pt" style:font-name-complex="Liberation Sans" style:font-size-complex="13pt"/>
    </style:style>
    <style:style style:name="P47" style:family="paragraph" style:parent-style-name="Standard">
      <style:text-properties style:font-name="Liberation Sans" fo:font-size="13pt" officeooo:rsid="00bc3324" officeooo:paragraph-rsid="00bc3324" style:font-size-asian="13pt" style:font-name-complex="Liberation Sans" style:font-size-complex="13pt"/>
    </style:style>
    <style:style style:name="P48" style:family="paragraph" style:parent-style-name="Standard">
      <style:paragraph-properties fo:break-before="page"/>
      <style:text-properties style:font-name="Liberation Sans" fo:font-size="13pt" officeooo:rsid="00bc3324" officeooo:paragraph-rsid="00bc3324" style:font-size-asian="13pt" style:font-name-complex="Liberation Sans" style:font-size-complex="13pt"/>
    </style:style>
    <style:style style:name="P49" style:family="paragraph" style:parent-style-name="Standard">
      <style:text-properties style:font-name="Liberation Sans" fo:font-size="13pt" officeooo:rsid="00d8bfd8" officeooo:paragraph-rsid="00d8bfd8" style:font-size-asian="13pt" style:font-name-complex="Liberation Sans" style:font-size-complex="13pt"/>
    </style:style>
    <style:style style:name="P50" style:family="paragraph" style:parent-style-name="Standard">
      <style:text-properties style:font-name="Liberation Sans" fo:font-size="13pt" officeooo:rsid="00ea021a" officeooo:paragraph-rsid="00ea021a" style:font-size-asian="13pt" style:font-name-complex="Liberation Sans" style:font-size-complex="13pt"/>
    </style:style>
    <style:style style:name="P51" style:family="paragraph" style:parent-style-name="Standard">
      <style:text-properties style:font-name="Liberation Sans" fo:font-size="13pt" officeooo:rsid="00eca002" officeooo:paragraph-rsid="00eca002" style:font-size-asian="13pt" style:font-name-complex="Liberation Sans" style:font-size-complex="13pt"/>
    </style:style>
    <style:style style:name="P52" style:family="paragraph" style:parent-style-name="Standard">
      <style:text-properties style:font-name="Liberation Sans" fo:font-size="10pt" officeooo:rsid="003e0518" officeooo:paragraph-rsid="00473275" style:font-size-asian="10pt" style:font-name-complex="Liberation Sans" style:font-size-complex="10pt"/>
    </style:style>
    <style:style style:name="P53" style:family="paragraph" style:parent-style-name="Standard">
      <style:text-properties style:font-name="Liberation Sans" fo:font-size="10pt" officeooo:rsid="0088d4ee" officeooo:paragraph-rsid="008b85c7" style:font-size-asian="10pt" style:font-name-complex="Liberation Sans" style:font-size-complex="10pt"/>
    </style:style>
    <style:style style:name="P54" style:family="paragraph" style:parent-style-name="Standard">
      <style:text-properties style:font-name="Liberation Sans" fo:font-size="10pt" officeooo:rsid="00ae3e12" officeooo:paragraph-rsid="00ea021a" style:font-size-asian="10pt" style:font-name-complex="Liberation Sans" style:font-size-complex="10pt"/>
    </style:style>
    <style:style style:name="P55" style:family="paragraph" style:parent-style-name="Standard">
      <style:text-properties style:font-name="Liberation Sans" fo:font-size="13pt" officeooo:paragraph-rsid="00202feb" style:font-size-asian="13pt" style:font-size-complex="13pt"/>
    </style:style>
    <style:style style:name="P56" style:family="paragraph" style:parent-style-name="Standard">
      <style:text-properties style:font-name="Liberation Sans" fo:font-size="13pt" officeooo:rsid="004e3f38" officeooo:paragraph-rsid="004e3f38" style:font-size-asian="13pt" style:font-size-complex="13pt"/>
    </style:style>
    <style:style style:name="P57" style:family="paragraph" style:parent-style-name="Standard">
      <style:text-properties officeooo:paragraph-rsid="0096cd8a"/>
    </style:style>
    <style:style style:name="P58" style:family="paragraph" style:parent-style-name="Standard">
      <style:text-properties fo:font-size="10pt" officeooo:paragraph-rsid="0096cd8a" style:font-size-asian="10pt" style:font-size-complex="10pt"/>
    </style:style>
    <style:style style:name="P59" style:family="paragraph" style:parent-style-name="Table_20_Contents">
      <style:text-properties style:font-name="Liberation Sans" fo:font-size="13pt" style:font-size-asian="13pt" style:font-name-complex="Liberation Sans" style:font-size-complex="13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3pt" officeooo:rsid="003e0518" officeooo:paragraph-rsid="003e0518" style:font-size-asian="13pt" style:font-name-complex="Liberation Sans" style:font-size-complex="13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3pt" officeooo:rsid="003ff093" officeooo:paragraph-rsid="003ff093" style:font-size-asian="13pt" style:font-name-complex="Liberation Sans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3pt" officeooo:rsid="0041a8fe" officeooo:paragraph-rsid="0041a8fe" style:font-size-asian="13pt" style:font-name-complex="Liberation Sans" style:font-size-complex="13pt"/>
    </style:style>
    <style:style style:name="P63" style:family="paragraph" style:parent-style-name="Table_20_Contents">
      <style:text-properties style:font-name="Liberation Sans" fo:font-size="13pt" officeooo:paragraph-rsid="0042a3fe" style:font-size-asian="13pt" style:font-name-complex="Liberation Sans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3pt" officeooo:rsid="00434ab5" officeooo:paragraph-rsid="00434ab5" style:font-size-asian="13pt" style:font-name-complex="Liberation Sans" style:font-size-complex="13pt"/>
    </style:style>
    <style:style style:name="P65" style:family="paragraph" style:parent-style-name="Table_20_Contents">
      <style:text-properties style:font-name="Liberation Sans" fo:font-size="13pt" officeooo:paragraph-rsid="00564b78" style:font-size-asian="13pt" style:font-name-complex="Liberation Sans" style:font-size-complex="13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3pt" officeooo:rsid="003b0301" officeooo:paragraph-rsid="00a44ad6" style:font-size-asian="13pt" style:font-name-complex="Liberation Sans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3pt" officeooo:rsid="003c49bb" officeooo:paragraph-rsid="00a44ad6" style:font-size-asian="13pt" style:font-name-complex="Liberation Sans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3pt" officeooo:rsid="005b08ec" officeooo:paragraph-rsid="00a44ad6" style:font-size-asian="13pt" style:font-name-complex="Liberation Sans" style:font-size-complex="13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3pt" officeooo:rsid="00609203" officeooo:paragraph-rsid="00a44ad6" style:font-size-asian="13pt" style:font-name-complex="Liberation Sans" style:font-size-complex="13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3pt" officeooo:rsid="0061b62a" officeooo:paragraph-rsid="00a44ad6" style:font-size-asian="13pt" style:font-name-complex="Liberation Sans" style:font-size-complex="13pt"/>
    </style:style>
    <style:style style:name="P71" style:family="paragraph" style:parent-style-name="Table_20_Contents">
      <style:text-properties style:font-name="Liberation Sans" fo:font-size="13pt" officeooo:paragraph-rsid="0072a1e5" style:font-size-asian="13pt" style:font-name-complex="Liberation Sans" style:font-size-complex="13pt"/>
    </style:style>
    <style:style style:name="P72" style:family="paragraph" style:parent-style-name="Table_20_Contents">
      <style:text-properties style:font-name="Liberation Sans" fo:font-size="13pt" officeooo:paragraph-rsid="008d9c09" style:font-size-asian="13pt" style:font-name-complex="Liberation Sans" style:font-size-complex="13pt"/>
    </style:style>
    <style:style style:name="P73" style:family="paragraph" style:parent-style-name="Table_20_Contents">
      <style:text-properties style:font-name="Liberation Sans" fo:font-size="13pt" officeooo:paragraph-rsid="0090d6a6" style:font-size-asian="13pt" style:font-name-complex="Liberation Sans" style:font-size-complex="13pt"/>
    </style:style>
    <style:style style:name="P74" style:family="paragraph" style:parent-style-name="Table_20_Contents">
      <style:text-properties style:font-name="Liberation Sans" fo:font-size="13pt" officeooo:paragraph-rsid="00939ce5" style:font-size-asian="13pt" style:font-name-complex="Liberation Sans" style:font-size-complex="13pt"/>
    </style:style>
    <style:style style:name="P75" style:family="paragraph" style:parent-style-name="Table_20_Contents">
      <style:text-properties style:font-name="Liberation Sans" fo:font-size="13pt" officeooo:paragraph-rsid="0096cd8a" style:font-size-asian="13pt" style:font-name-complex="Liberation Sans" style:font-size-complex="13pt"/>
    </style:style>
    <style:style style:name="P76" style:family="paragraph" style:parent-style-name="Table_20_Contents">
      <style:text-properties style:font-name="Liberation Sans" fo:font-size="13pt" officeooo:paragraph-rsid="00ea021a" style:font-size-asian="13pt" style:font-name-complex="Liberation Sans" style:font-size-complex="13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e0518" officeooo:paragraph-rsid="003e0518" style:font-size-asian="13pt" style:font-weight-asian="bold" style:font-name-complex="Liberation Sans" style:font-size-complex="13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39b3f7" officeooo:paragraph-rsid="00a44ad6" style:font-size-asian="13pt" style:font-weight-asian="bold" style:font-name-complex="Liberation Sans" style:font-size-complex="13pt" style:font-weight-complex="bold"/>
    </style:style>
    <style:style style:name="P79" style:family="paragraph" style:parent-style-name="Table_20_Contents">
      <style:text-properties style:font-name="Liberation Sans" fo:font-size="13pt" officeooo:paragraph-rsid="000ad30a" fo:background-color="#ffff00" style:font-size-asian="13pt" style:font-name-complex="Liberation Sans" style:font-size-complex="13pt"/>
    </style:style>
    <style:style style:name="P80" style:family="paragraph" style:parent-style-name="Table_20_Contents">
      <style:text-properties fo:color="#127622" loext:opacity="100%" style:font-name="Liberation Sans" fo:font-size="13pt" fo:font-weight="bold" officeooo:paragraph-rsid="0042a3fe" style:font-size-asian="13pt" style:font-weight-asian="bold" style:font-name-complex="Liberation Sans" style:font-size-complex="13pt" style:font-weight-complex="bold"/>
    </style:style>
    <style:style style:name="P81" style:family="paragraph" style:parent-style-name="Table_20_Contents">
      <style:text-properties fo:color="#127622" loext:opacity="100%" style:font-name="Liberation Sans" fo:font-size="13pt" fo:font-weight="bold" officeooo:paragraph-rsid="004ef68d" style:font-size-asian="13pt" style:font-weight-asian="bold" style:font-name-complex="Liberation Sans" style:font-size-complex="13pt" style:font-weight-complex="bold"/>
    </style:style>
    <style:style style:name="P82" style:family="paragraph" style:parent-style-name="Table_20_Contents">
      <style:text-properties fo:color="#127622" loext:opacity="100%" style:font-name="Liberation Sans" fo:font-size="13pt" fo:font-weight="bold" officeooo:paragraph-rsid="00564b78" style:font-size-asian="13pt" style:font-weight-asian="bold" style:font-name-complex="Liberation Sans" style:font-size-complex="13pt" style:font-weight-complex="bold"/>
    </style:style>
    <style:style style:name="P83" style:family="paragraph" style:parent-style-name="Table_20_Contents">
      <style:text-properties fo:color="#127622" loext:opacity="100%" style:font-name="Liberation Sans" fo:font-size="13pt" fo:font-weight="bold" officeooo:paragraph-rsid="0072a1e5" style:font-size-asian="13pt" style:font-weight-asian="bold" style:font-name-complex="Liberation Sans" style:font-size-complex="13pt" style:font-weight-complex="bold"/>
    </style:style>
    <style:style style:name="P84" style:family="paragraph" style:parent-style-name="Table_20_Contents">
      <style:text-properties fo:color="#127622" loext:opacity="100%" style:font-name="Liberation Sans" fo:font-size="13pt" fo:font-weight="bold" officeooo:paragraph-rsid="007ca689" style:font-size-asian="13pt" style:font-weight-asian="bold" style:font-name-complex="Liberation Sans" style:font-size-complex="13pt" style:font-weight-complex="bold"/>
    </style:style>
    <style:style style:name="P85" style:family="paragraph" style:parent-style-name="Table_20_Contents">
      <style:text-properties fo:color="#127622" loext:opacity="100%" style:font-name="Liberation Sans" fo:font-size="13pt" fo:font-weight="bold" officeooo:paragraph-rsid="008d9c09" style:font-size-asian="13pt" style:font-weight-asian="bold" style:font-name-complex="Liberation Sans" style:font-size-complex="13pt" style:font-weight-complex="bold"/>
    </style:style>
    <style:style style:name="P86" style:family="paragraph" style:parent-style-name="Table_20_Contents">
      <style:text-properties fo:color="#127622" loext:opacity="100%" style:font-name="Liberation Sans" fo:font-size="13pt" fo:font-weight="bold" officeooo:paragraph-rsid="0090d6a6" style:font-size-asian="13pt" style:font-weight-asian="bold" style:font-name-complex="Liberation Sans" style:font-size-complex="13pt" style:font-weight-complex="bold"/>
    </style:style>
    <style:style style:name="P87" style:family="paragraph" style:parent-style-name="Table_20_Contents">
      <style:text-properties fo:color="#127622" loext:opacity="100%" style:font-name="Liberation Sans" fo:font-size="13pt" fo:font-weight="bold" officeooo:paragraph-rsid="00939ce5" style:font-size-asian="13pt" style:font-weight-asian="bold" style:font-name-complex="Liberation Sans" style:font-size-complex="13pt" style:font-weight-complex="bold"/>
    </style:style>
    <style:style style:name="P88" style:family="paragraph" style:parent-style-name="Table_20_Contents">
      <style:text-properties fo:color="#127622" loext:opacity="100%" style:font-name="Liberation Sans" fo:font-size="13pt" fo:font-weight="bold" officeooo:paragraph-rsid="00d03a7f" style:font-size-asian="13pt" style:font-weight-asian="bold" style:font-name-complex="Liberation Sans" style:font-size-complex="13pt" style:font-weight-complex="bold"/>
    </style:style>
    <style:style style:name="P89" style:family="paragraph" style:parent-style-name="Table_20_Contents">
      <style:text-properties fo:color="#127622" loext:opacity="100%" style:text-line-through-style="none" style:text-line-through-type="none" style:font-name="Liberation Sans" fo:font-size="13pt" fo:font-weight="bold" officeooo:paragraph-rsid="00564b78" style:font-size-asian="13pt" style:font-weight-asian="bold" style:font-name-complex="Liberation Sans" style:font-size-complex="13pt" style:font-weight-complex="bold"/>
    </style:style>
    <style:style style:name="P90" style:family="paragraph" style:parent-style-name="Table_20_Contents">
      <style:text-properties fo:color="#d62e4e" loext:opacity="100%" style:font-name="Liberation Sans" fo:font-size="13pt" officeooo:paragraph-rsid="004ef68d" style:font-size-asian="13pt" style:font-name-complex="Liberation Sans" style:font-size-complex="13pt"/>
    </style:style>
    <style:style style:name="P91" style:family="paragraph" style:parent-style-name="Table_20_Contents">
      <style:text-properties style:use-window-font-color="true" loext:opacity="0%" style:font-name="Liberation Sans" fo:font-size="13pt" fo:font-weight="normal" officeooo:paragraph-rsid="004ef68d" style:font-size-asian="13pt" style:font-weight-asian="normal" style:font-name-complex="Liberation Sans" style:font-size-complex="13pt" style:font-weight-complex="normal"/>
    </style:style>
    <style:style style:name="P92" style:family="paragraph" style:parent-style-name="Table_20_Contents">
      <style:text-properties style:use-window-font-color="true" loext:opacity="0%" style:font-name="Liberation Sans" fo:font-size="13pt" fo:font-weight="normal" officeooo:paragraph-rsid="00d03a7f" style:font-size-asian="13pt" style:font-weight-asian="normal" style:font-name-complex="Liberation Sans" style:font-size-complex="13pt" style:font-weight-complex="normal"/>
    </style:style>
    <style:style style:name="P93" style:family="paragraph" style:parent-style-name="Table_20_Contents">
      <style:text-properties style:text-line-through-style="none" style:text-line-through-type="none" style:font-name="Liberation Sans" fo:font-size="13pt" officeooo:paragraph-rsid="00564b78" style:font-size-asian="13pt" style:font-name-complex="Liberation Sans" style:font-size-complex="13pt"/>
    </style:style>
    <style:style style:name="P94" style:family="paragraph" style:parent-style-name="Table_20_Contents">
      <style:text-properties fo:color="#ff0000" loext:opacity="100%" style:font-name="Liberation Sans" fo:font-size="13pt" fo:font-weight="normal" officeooo:paragraph-rsid="007ca689" style:font-size-asian="13pt" style:font-weight-asian="normal" style:font-name-complex="Liberation Sans" style:font-size-complex="13pt" style:font-weight-complex="normal"/>
    </style:style>
    <style:style style:name="P95" style:family="paragraph" style:parent-style-name="Table_20_Contents">
      <style:text-properties officeooo:paragraph-rsid="00939ce5"/>
    </style:style>
    <style:style style:name="T1" style:family="text">
      <style:text-properties fo:color="#127622" loext:opacity="100%"/>
    </style:style>
    <style:style style:name="T2" style:family="text">
      <style:text-properties fo:color="#127622" loext:opacity="100%" officeooo:rsid="001db840"/>
    </style:style>
    <style:style style:name="T3" style:family="text">
      <style:text-properties fo:color="#127622" loext:opacity="100%" officeooo:rsid="0036d329"/>
    </style:style>
    <style:style style:name="T4" style:family="text">
      <style:text-properties fo:color="#127622" loext:opacity="100%" officeooo:rsid="004cde4a"/>
    </style:style>
    <style:style style:name="T5" style:family="text">
      <style:text-properties fo:color="#127622" loext:opacity="100%" officeooo:rsid="005110ce"/>
    </style:style>
    <style:style style:name="T6" style:family="text">
      <style:text-properties fo:color="#127622" loext:opacity="100%" style:font-name="Liberation Sans" fo:font-size="13pt" style:font-size-asian="13pt" style:font-name-complex="Liberation Sans" style:font-size-complex="13pt"/>
    </style:style>
    <style:style style:name="T7" style:family="text">
      <style:text-properties fo:color="#127622" loext:opacity="100%" style:font-name="Liberation Sans" fo:font-size="13pt" officeooo:rsid="0097447e" style:font-size-asian="13pt" style:font-name-complex="Liberation Sans" style:font-size-complex="13pt"/>
    </style:style>
    <style:style style:name="T8" style:family="text">
      <style:text-properties fo:color="#127622" loext:opacity="100%" officeooo:rsid="00dc9eb8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officeooo:rsid="00b8ab89"/>
    </style:style>
    <style:style style:name="T11" style:family="text">
      <style:text-properties officeooo:rsid="00121f9a"/>
    </style:style>
    <style:style style:name="T12" style:family="text">
      <style:text-properties officeooo:rsid="0012a573"/>
    </style:style>
    <style:style style:name="T13" style:family="text">
      <style:text-properties officeooo:rsid="0014892d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d9122"/>
    </style:style>
    <style:style style:name="T17" style:family="text">
      <style:text-properties officeooo:rsid="001db840"/>
    </style:style>
    <style:style style:name="T18" style:family="text">
      <style:text-properties fo:color="#d62e4e" loext:opacity="100%" fo:font-weight="bold" officeooo:rsid="00202feb" style:font-weight-asian="bold" style:font-name-complex="Liberation Sans" style:font-weight-complex="bold"/>
    </style:style>
    <style:style style:name="T19" style:family="text">
      <style:text-properties officeooo:rsid="0023e764"/>
    </style:style>
    <style:style style:name="T20" style:family="text">
      <style:text-properties officeooo:rsid="002c2ca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#ffff00" loext:char-shading-value="0" style:font-style-asian="italic" style:font-style-complex="italic"/>
    </style:style>
    <style:style style:name="T23" style:family="text">
      <style:text-properties officeooo:rsid="002db368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924a4c"/>
    </style:style>
    <style:style style:name="T27" style:family="text">
      <style:text-properties officeooo:rsid="003df898"/>
    </style:style>
    <style:style style:name="T28" style:family="text">
      <style:text-properties officeooo:rsid="003e0518"/>
    </style:style>
    <style:style style:name="T29" style:family="text">
      <style:text-properties style:font-name="Liberation Sans" fo:font-size="13pt" style:font-size-asian="13pt" style:font-name-complex="Liberation Sans" style:font-size-complex="13pt"/>
    </style:style>
    <style:style style:name="T30" style:family="text">
      <style:text-properties style:font-name="Liberation Sans" fo:font-size="13pt" officeooo:rsid="0096cd8a" style:font-size-asian="13pt" style:font-name-complex="Liberation Sans" style:font-size-complex="13pt"/>
    </style:style>
    <style:style style:name="T31" style:family="text">
      <style:text-properties style:font-name="Liberation Sans" fo:font-size="13pt" officeooo:rsid="0097447e" style:font-size-asian="13pt" style:font-name-complex="Liberation Sans" style:font-size-complex="13pt"/>
    </style:style>
    <style:style style:name="T32" style:family="text">
      <style:text-properties style:font-name="Liberation Sans" fo:font-size="13pt" officeooo:rsid="0097febb" style:font-size-asian="13pt" style:font-name-complex="Liberation Sans" style:font-size-complex="13pt"/>
    </style:style>
    <style:style style:name="T33" style:family="text">
      <style:text-properties style:font-name="Liberation Sans" fo:font-size="13pt" officeooo:rsid="009a181e" style:font-size-asian="13pt" style:font-name-complex="Liberation Sans" style:font-size-complex="13pt"/>
    </style:style>
    <style:style style:name="T34" style:family="text">
      <style:text-properties style:font-name="Liberation Sans" fo:font-size="13pt" officeooo:rsid="00a95908" style:font-size-asian="13pt" style:font-name-complex="Liberation Sans" style:font-size-complex="13pt"/>
    </style:style>
    <style:style style:name="T35" style:family="text">
      <style:text-properties style:font-name="Liberation Sans" fo:font-size="13pt" officeooo:rsid="00d9f08d" style:font-size-asian="13pt" style:font-name-complex="Liberation Sans" style:font-size-complex="13pt"/>
    </style:style>
    <style:style style:name="T36" style:family="text">
      <style:text-properties style:font-name="Liberation Sans" fo:font-size="13pt" fo:background-color="#ffff00" loext:char-shading-value="0" style:font-size-asian="13pt" style:font-name-complex="Liberation Sans" style:font-size-complex="13pt"/>
    </style:style>
    <style:style style:name="T37" style:family="text">
      <style:text-properties style:font-name="Liberation Sans" fo:font-size="13pt" fo:background-color="transparent" loext:char-shading-value="0" style:font-size-asian="13pt" style:font-name-complex="Liberation Sans" style:font-size-complex="13pt"/>
    </style:style>
    <style:style style:name="T38" style:family="text">
      <style:text-properties style:font-name="Liberation Sans" fo:font-size="13pt" style:text-underline-style="solid" style:text-underline-width="auto" style:text-underline-color="font-color" officeooo:rsid="00d9f08d" style:font-size-asian="13pt" style:font-name-complex="Liberation Sans" style:font-size-complex="13pt"/>
    </style:style>
    <style:style style:name="T39" style:family="text">
      <style:text-properties style:font-name="Liberation Sans" officeooo:rsid="0096cd8a" style:font-name-complex="Liberation Sans"/>
    </style:style>
    <style:style style:name="T40" style:family="text">
      <style:text-properties officeooo:rsid="00473275"/>
    </style:style>
    <style:style style:name="T41" style:family="text">
      <style:text-properties officeooo:rsid="0049fa71"/>
    </style:style>
    <style:style style:name="T42" style:family="text">
      <style:text-properties officeooo:rsid="004aac4f"/>
    </style:style>
    <style:style style:name="T43" style:family="text">
      <style:text-properties officeooo:rsid="004ef68d"/>
    </style:style>
    <style:style style:name="T44" style:family="text">
      <style:text-properties officeooo:rsid="00505298"/>
    </style:style>
    <style:style style:name="T45" style:family="text">
      <style:text-properties officeooo:rsid="0051ba0e"/>
    </style:style>
    <style:style style:name="T46" style:family="text">
      <style:text-properties officeooo:rsid="0052fe75"/>
    </style:style>
    <style:style style:name="T47" style:family="text">
      <style:text-properties officeooo:rsid="0057bd5f"/>
    </style:style>
    <style:style style:name="T48" style:family="text">
      <style:text-properties officeooo:rsid="00594213"/>
    </style:style>
    <style:style style:name="T49" style:family="text">
      <style:text-properties officeooo:rsid="005b8f16"/>
    </style:style>
    <style:style style:name="T50" style:family="text">
      <style:text-properties officeooo:rsid="00609203"/>
    </style:style>
    <style:style style:name="T51" style:family="text">
      <style:text-properties officeooo:rsid="00626e90"/>
    </style:style>
    <style:style style:name="T52" style:family="text">
      <style:text-properties officeooo:rsid="00637b5e"/>
    </style:style>
    <style:style style:name="T53" style:family="text">
      <style:text-properties officeooo:rsid="006572e5"/>
    </style:style>
    <style:style style:name="T54" style:family="text">
      <style:text-properties officeooo:rsid="0069b8e7"/>
    </style:style>
    <style:style style:name="T55" style:family="text">
      <style:text-properties officeooo:rsid="006c5c4b"/>
    </style:style>
    <style:style style:name="T56" style:family="text">
      <style:text-properties officeooo:rsid="006e5b79"/>
    </style:style>
    <style:style style:name="T57" style:family="text">
      <style:text-properties officeooo:rsid="007006b0"/>
    </style:style>
    <style:style style:name="T58" style:family="text">
      <style:text-properties officeooo:rsid="0071f41a"/>
    </style:style>
    <style:style style:name="T59" style:family="text">
      <style:text-properties officeooo:rsid="0072a1e5"/>
    </style:style>
    <style:style style:name="T60" style:family="text">
      <style:text-properties officeooo:rsid="0073671c"/>
    </style:style>
    <style:style style:name="T61" style:family="text">
      <style:text-properties officeooo:rsid="008250ab"/>
    </style:style>
    <style:style style:name="T62" style:family="text">
      <style:text-properties style:use-window-font-color="true" loext:opacity="0%"/>
    </style:style>
    <style:style style:name="T63" style:family="text">
      <style:text-properties style:use-window-font-color="true" loext:opacity="0%" officeooo:rsid="00e3e818"/>
    </style:style>
    <style:style style:name="T64" style:family="text">
      <style:text-properties style:use-window-font-color="true" loext:opacity="0%" officeooo:rsid="00e4e63e"/>
    </style:style>
    <style:style style:name="T65" style:family="text">
      <style:text-properties officeooo:rsid="00924a4c"/>
    </style:style>
    <style:style style:name="T66" style:family="text">
      <style:text-properties officeooo:rsid="009a513c"/>
    </style:style>
    <style:style style:name="T67" style:family="text">
      <style:text-properties officeooo:rsid="009af2fe"/>
    </style:style>
    <style:style style:name="T68" style:family="text">
      <style:text-properties officeooo:rsid="009f1110"/>
    </style:style>
    <style:style style:name="T69" style:family="text">
      <style:text-properties officeooo:rsid="00a023e6"/>
    </style:style>
    <style:style style:name="T70" style:family="text">
      <style:text-properties style:text-position="super 58%" officeooo:rsid="00a023e6"/>
    </style:style>
    <style:style style:name="T71" style:family="text">
      <style:text-properties style:text-position="super 58%" officeooo:rsid="00e917ba"/>
    </style:style>
    <style:style style:name="T72" style:family="text">
      <style:text-properties style:text-position="0% 100%"/>
    </style:style>
    <style:style style:name="T73" style:family="text">
      <style:text-properties officeooo:rsid="00a7c85c"/>
    </style:style>
    <style:style style:name="T74" style:family="text">
      <style:text-properties officeooo:rsid="00ab7475"/>
    </style:style>
    <style:style style:name="T75" style:family="text">
      <style:text-properties officeooo:rsid="00ae3e12"/>
    </style:style>
    <style:style style:name="T76" style:family="text">
      <style:text-properties officeooo:rsid="00b0031c"/>
    </style:style>
    <style:style style:name="T77" style:family="text">
      <style:text-properties officeooo:rsid="00b02907"/>
    </style:style>
    <style:style style:name="T78" style:family="text">
      <style:text-properties officeooo:rsid="00b0d232"/>
    </style:style>
    <style:style style:name="T79" style:family="text">
      <style:text-properties officeooo:rsid="00b0f13e"/>
    </style:style>
    <style:style style:name="T80" style:family="text">
      <style:text-properties officeooo:rsid="00b2cb54"/>
    </style:style>
    <style:style style:name="T81" style:family="text">
      <style:text-properties officeooo:rsid="00b4726c"/>
    </style:style>
    <style:style style:name="T82" style:family="text">
      <style:text-properties officeooo:rsid="00b4c8ab"/>
    </style:style>
    <style:style style:name="T83" style:family="text">
      <style:text-properties officeooo:rsid="00b765cb"/>
    </style:style>
    <style:style style:name="T84" style:family="text">
      <style:text-properties officeooo:rsid="00b8ab89"/>
    </style:style>
    <style:style style:name="T85" style:family="text">
      <style:text-properties officeooo:rsid="00bb3bb2"/>
    </style:style>
    <style:style style:name="T86" style:family="text">
      <style:text-properties officeooo:rsid="00bca202"/>
    </style:style>
    <style:style style:name="T87" style:family="text">
      <style:text-properties officeooo:rsid="00be3284"/>
    </style:style>
    <style:style style:name="T88" style:family="text">
      <style:text-properties officeooo:rsid="00bf8670"/>
    </style:style>
    <style:style style:name="T89" style:family="text">
      <style:text-properties officeooo:rsid="00c04a89"/>
    </style:style>
    <style:style style:name="T90" style:family="text">
      <style:text-properties officeooo:rsid="00c1db10"/>
    </style:style>
    <style:style style:name="T91" style:family="text">
      <style:text-properties officeooo:rsid="00c371fe"/>
    </style:style>
    <style:style style:name="T92" style:family="text">
      <style:text-properties officeooo:rsid="00c3d2d2"/>
    </style:style>
    <style:style style:name="T93" style:family="text">
      <style:text-properties officeooo:rsid="00c573bf"/>
    </style:style>
    <style:style style:name="T94" style:family="text">
      <style:text-properties officeooo:rsid="00d17417"/>
    </style:style>
    <style:style style:name="T95" style:family="text">
      <style:text-properties officeooo:rsid="00d3280c"/>
    </style:style>
    <style:style style:name="T96" style:family="text">
      <style:text-properties officeooo:rsid="00d4bc7a"/>
    </style:style>
    <style:style style:name="T97" style:family="text">
      <style:text-properties officeooo:rsid="00d5c1c0"/>
    </style:style>
    <style:style style:name="T98" style:family="text">
      <style:text-properties officeooo:rsid="00d7725f"/>
    </style:style>
    <style:style style:name="T99" style:family="text">
      <style:text-properties officeooo:rsid="00dc9eb8"/>
    </style:style>
    <style:style style:name="T100" style:family="text">
      <style:text-properties officeooo:rsid="00de6f1f"/>
    </style:style>
    <style:style style:name="T101" style:family="text">
      <style:text-properties officeooo:rsid="00dff3e0"/>
    </style:style>
    <style:style style:name="T102" style:family="text">
      <style:text-properties officeooo:rsid="00e1d2bb"/>
    </style:style>
    <style:style style:name="T103" style:family="text">
      <style:text-properties officeooo:rsid="00e69ac7"/>
    </style:style>
    <style:style style:name="T104" style:family="text">
      <style:text-properties officeooo:rsid="00e917ba"/>
    </style:style>
    <style:style style:name="T105" style:family="text">
      <style:text-properties officeooo:rsid="00e97d03"/>
    </style:style>
    <style:style style:name="T106" style:family="text">
      <style:text-properties officeooo:rsid="00ea021a"/>
    </style:style>
    <style:style style:name="T107" style:family="text">
      <style:text-properties officeooo:rsid="00eb76da"/>
    </style:style>
    <style:style style:name="T108" style:family="text">
      <style:text-properties officeooo:rsid="00eca00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e word study: Transgress<text:span text:style-name="T89">* </text:span><text:span text:style-name="T92">and how it relates to sin as defined by the Bible.</text:span></text:p>
      <text:p text:style-name="P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77">Word</text:p>
          </table:table-cell>
          <table:table-cell table:style-name="Table7.B1" office:value-type="string">
            <text:p text:style-name="P77">Number of occurrences in the Bible</text:p>
          </table:table-cell>
        </table:table-row>
        <table:table-row>
          <table:table-cell table:style-name="Table7.A2" office:value-type="string">
            <text:p text:style-name="P61">Transgress*</text:p>
          </table:table-cell>
          <table:table-cell table:style-name="Table7.B2" office:value-type="string">
            <text:p text:style-name="P61">179 times in 172 verses</text:p>
          </table:table-cell>
        </table:table-row>
        <table:table-row>
          <table:table-cell table:style-name="Table7.A2" office:value-type="string">
            <text:p text:style-name="P60">Transgress</text:p>
          </table:table-cell>
          <table:table-cell table:style-name="Table7.B2" office:value-type="string">
            <text:p text:style-name="P60">14 times in 14 verses</text:p>
          </table:table-cell>
        </table:table-row>
        <table:table-row>
          <table:table-cell table:style-name="Table7.A2" office:value-type="string">
            <text:p text:style-name="P60">Transgression</text:p>
          </table:table-cell>
          <table:table-cell table:style-name="Table7.B2" office:value-type="string">
            <text:p text:style-name="P60">51 times in 50 verses</text:p>
          </table:table-cell>
        </table:table-row>
        <table:table-row>
          <table:table-cell table:style-name="Table7.A2" office:value-type="string">
            <text:p text:style-name="P61">Transgressions</text:p>
          </table:table-cell>
          <table:table-cell table:style-name="Table7.B2" office:value-type="string">
            <text:p text:style-name="P61">48 times in 47 verses</text:p>
          </table:table-cell>
        </table:table-row>
        <table:table-row>
          <table:table-cell table:style-name="Table7.A2" office:value-type="string">
            <text:p text:style-name="P61">Transgressed</text:p>
          </table:table-cell>
          <table:table-cell table:style-name="Table7.B2" office:value-type="string">
            <text:p text:style-name="P61">34 times in 34 verses</text:p>
          </table:table-cell>
        </table:table-row>
        <table:table-row>
          <table:table-cell table:style-name="Table7.A2" office:value-type="string">
            <text:p text:style-name="P62">Transgressor</text:p>
          </table:table-cell>
          <table:table-cell table:style-name="Table7.B2" office:value-type="string">
            <text:p text:style-name="P62">5 times in 5 verses</text:p>
          </table:table-cell>
        </table:table-row>
        <table:table-row>
          <table:table-cell table:style-name="Table7.A2" office:value-type="string">
            <text:p text:style-name="P62">Transgressors</text:p>
          </table:table-cell>
          <table:table-cell table:style-name="Table7.B2" office:value-type="string">
            <text:p text:style-name="P62">20 times in 19 verses</text:p>
          </table:table-cell>
        </table:table-row>
        <table:table-row>
          <table:table-cell table:style-name="Table7.A2" office:value-type="string">
            <text:p text:style-name="P62">Transgresseth (third person singular)</text:p>
          </table:table-cell>
          <table:table-cell table:style-name="Table7.B2" office:value-type="string">
            <text:p text:style-name="P62">4 times in 4 verses</text:p>
          </table:table-cell>
        </table:table-row>
        <table:table-row>
          <table:table-cell table:style-name="Table7.A2" office:value-type="string">
            <text:p text:style-name="P64">Transgressest (second person singular)</text:p>
          </table:table-cell>
          <table:table-cell table:style-name="Table7.B2" office:value-type="string">
            <text:p text:style-name="P64">1 time in 1 verse</text:p>
          </table:table-cell>
        </table:table-row>
        <table:table-row>
          <table:table-cell table:style-name="Table7.A2" office:value-type="string">
            <text:p text:style-name="P64">Transgressing</text:p>
          </table:table-cell>
          <table:table-cell table:style-name="Table7.B2" office:value-type="string">
            <text:p text:style-name="P64">2 times in 2 verses</text:p>
          </table:table-cell>
        </table:table-row>
      </table:table>
      <text:p text:style-name="P52">(the asterisk “*” indicates <text:span text:style-name="T40">the addition of </text:span>any number of letters <text:span text:style-name="T40">that </text:span><text:span text:style-name="T90">when combined with the indicated prefix </text:span><text:span text:style-name="T40">constitute a whole word</text:span>)</text:p>
      <text:p text:style-name="P1"/>
      <text:p text:style-name="P3">The first occurrence of the word “transgress<text:span text:style-name="T28">*</text:span>” appears in <text:span text:style-name="T1">Exodus 23:21</text:span><text:span text:style-name="T62"> </text:span><text:span text:style-name="T63">(H6588, </text:span><text:span text:style-name="T64">translated elsewhere as trespass, sin, and rebellion</text:span><text:span text:style-name="T63">)</text:span>. The context is instructions given to Moses by God at Mount Sinai that Moses was to give to the children of Israel (<text:span text:style-name="T1">Exodus 20:22</text:span>).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Exodus 20:22</text:p>
            <text:p text:style-name="P5">And the LORD said unto Moses, <text:span text:style-name="T9">Thus thou shalt say unto the children of Israel, Ye have seen that I have talked with you from heaven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Exodus 23:20-<text:span text:style-name="T41">22</text:span></text:p>
            <text:p text:style-name="P6"><text:span text:style-name="T1">20</text:span> <text:span text:style-name="T9">Behold, I send an Angel before thee, to keep thee in the way, and to bring thee into the place which I have prepared.</text:span></text:p>
            <text:p text:style-name="P79"><text:span text:style-name="T1">21</text:span> <text:span text:style-name="T9">Beware of him, and obey his voice, provoke him not; for he will not pardon your transgressions: for my name is in him.</text:span></text:p>
            <text:p text:style-name="P6"><text:span text:style-name="T1">22</text:span> <text:span text:style-name="T9">But if thou shalt indeed obey his voice, and do all that I speak; then I will be an enemy unto thine enemies, and an adversary unto thine adversaries.</text:span></text:p>
          </table:table-cell>
        </table:table-row>
      </table:table>
      <text:p text:style-name="P3"/>
      <text:p text:style-name="P19">Among other things, here we learn that a transgression is to disobey the voice of the <text:span text:style-name="T25">A</text:span>ngel <text:span text:style-name="T91">of</text:span> whom the name of the LORD is in.</text:p>
      <text:p text:style-name="P3"/>
      <text:p text:style-name="P17">Take note <text:span text:style-name="T42">that t</text:span>he word “<text:span text:style-name="T25">A</text:span>ngel” (capitalized “<text:span text:style-name="T42">a”</text:span>) appears 4 times in 4 verses in the Bible (<text:span text:style-name="T1">Genesis 48:16</text:span>, <text:span text:style-name="T1">Exodus 23:20</text:span>, <text:span text:style-name="T1">Exodus 23:23</text:span>, <text:span text:style-name="T1">Exodus 32:34</text:span>). <text:span text:style-name="T11">While the Hebrew word for angel (מֲלְאָךְ mălʼâk, </text:span><text:span text:style-name="T42">pronounced </text:span><text:span text:style-name="T11">mal-awk', </text:span><text:span text:style-name="T12">H4397</text:span><text:span text:style-name="T11">) is the same for both “Angel” and “angel”, the capital “A” clearly </text:span><text:span text:style-name="T13">conveys</text:span><text:span text:style-name="T11"> a different meaning </text:span><text:span text:style-name="T12">than the not-capitalized “angel”. </text:span><text:span text:style-name="T16">The context of the first usage of “Angel” is when Israel was blessing </text:span><text:span text:style-name="T19">Ephraim and Manasseh</text:span><text:span text:style-name="T16"> </text:span><text:span text:style-name="T17">and it appears to refer to God (</text:span><text:span text:style-name="T2">Genesis 48:1</text:span><text:span text:style-name="T4">4</text:span><text:span text:style-name="T2">-16</text:span><text:span text:style-name="T17">).</text:span></text:p>
      <text:p text:style-name="P55"><text:span text:style-name="T18"/></text:p>
      <text:p text:style-name="P56">So, if disobeying the voice of God is called a transgression, then how does it relate to <text:span text:style-name="T81">iniquity and specifically </text:span>sin which are other words used <text:span text:style-name="T82">in the Bible </text:span>to describe disobedience to God?</text:p>
      <text:p text:style-name="P56"><text:soft-page-break/></text:p>
      <text:p text:style-name="P20"><text:span text:style-name="T43">In</text:span> <text:span text:style-name="T1">Exodus 34:7</text:span>, <text:span text:style-name="T5">Joshua 24:19</text:span>, et. al. <text:span text:style-name="T43">We learn that </text:span><text:span text:style-name="T44">iniquity, </text:span><text:span text:style-name="T23">t</text:span>ransgression and sin are not exactly the same th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1">Exodus 34:<text:span text:style-name="T20">7</text:span></text:p>
            <text:p text:style-name="P90">Keeping mercy for thousands, forgiving <text:span text:style-name="T14">iniquity</text:span> and <text:span text:style-name="T14">transgression</text:span> and <text:span text:style-name="T14">sin</text:span>, and that will by no means clear <text:span text:style-name="T21">the guilty</text:span>; visiting the iniquity of the fathers upon the children, and upon the children's children, unto the third and to the fourth <text:span text:style-name="T21">generation</text:span>.</text:p>
          </table:table-cell>
        </table:table-row>
        <table:table-row>
          <table:table-cell table:style-name="Table1.A2" office:value-type="string">
            <text:p text:style-name="P81">Joshua 24:19</text:p>
            <text:p text:style-name="P91">And Joshua said unto the people, Ye cannot serve the LORD: for he <text:span text:style-name="T21">is</text:span> an holy God; he <text:span text:style-name="T21">is</text:span> a jealous God; he will not forgive your <text:span text:style-name="T15">transgressions</text:span> <text:span text:style-name="T15">nor</text:span> your <text:span text:style-name="T15">sins</text:span>.</text:p>
          </table:table-cell>
        </table:table-row>
        <table:table-row>
          <table:table-cell table:style-name="Table1.A3" office:value-type="string">
            <text:p text:style-name="P88">Isaiah 44:22</text:p>
            <text:p text:style-name="P92">I have blotted out, as a thick cloud, thy transgressions, and, as a cloud, thy sins: return unto me; for I have redeemed thee.</text:p>
          </table:table-cell>
        </table:table-row>
      </table:table>
      <text:p text:style-name="P20"/>
      <text:p text:style-name="P4">In <text:span text:style-name="T1">Leviticus </text:span><text:span text:style-name="T3">16:16, </text:span><text:span text:style-name="T1">16:21</text:span> we learn that transgression <text:span text:style-name="T45">and sin are very closely tied together </text:span><text:span text:style-name="T93">(specifically, a transgression is a type of sin, </text:span><text:span text:style-name="T94">and thus a transgression is always sin</text:span><text:span text:style-name="T93">)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Leviticus 16:16</text:p>
            <text:p text:style-name="P12">And he shall make an atonement for the holy <text:span text:style-name="T21">place</text:span>, because of the uncleanness of the children of Israel, and because of their transgressions <text:span text:style-name="T14">in all</text:span> their sins: and so shall he do for the tabernacle of the congregation, that remaineth among them in the midst of their uncleanness.</text:p>
          </table:table-cell>
        </table:table-row>
        <table:table-row>
          <table:table-cell table:style-name="Table2.A2" office:value-type="string">
            <text:p text:style-name="P9">Leviticus 16:21</text:p>
            <text:p text:style-name="P11">And Aaron shall lay both his hands upon the head of the live goat, and confess over him all the <text:span text:style-name="T24">iniquities</text:span> of the children of Israel, and all their transgressions <text:span text:style-name="T14">in all</text:span> their sins, putting them upon the head of the goat, and shall send <text:span text:style-name="T21">him</text:span> away by the hand of a fit man into the wilderness:</text:p>
          </table:table-cell>
        </table:table-row>
      </table:table>
      <text:p text:style-name="P4"/>
      <text:p text:style-name="P24"><text:span text:style-name="T95">T</text:span>he first occurrence of the word sin <text:span text:style-name="T95">is i</text:span>n <text:span text:style-name="T1">Genesis 4:7</text:span> <text:span text:style-name="T95">where </text:span>we learn that sin is the opposite of doing well (which is <text:span text:style-name="T96">also </text:span>acceptable <text:span text:style-name="T47">to God</text:span>). <text:span text:style-name="T97">T</text:span>herefore, sin <text:span text:style-name="T47">can be roughly</text:span> <text:span text:style-name="T47">defined as “behavior that is not acceptable to God.</text:span>”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2">Genesis 4:7</text:p>
            <text:p text:style-name="P65">If thou doest well, shalt thou not be accepted? and if thou doest not well, sin lieth at the door. And unto thee <text:span text:style-name="T21">shall be</text:span> his desire, and thou shalt rule over him.</text:p>
          </table:table-cell>
        </table:table-row>
      </table:table>
      <text:p text:style-name="P23"/>
      <text:p text:style-name="P21"><text:span text:style-name="T1">I John 3:4</text:span> <text:span text:style-name="T98">reveals more about the</text:span><text:span text:style-name="T46"> relationship </text:span><text:span text:style-name="T48">between sin and transgression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80">1 John 3:4</text:p>
            <text:p text:style-name="P63">Whosoever committeth sin transgresseth also the law: for sin is the transgression of the law.</text:p>
          </table:table-cell>
        </table:table-row>
      </table:table>
      <text:p text:style-name="P31"/>
      <text:p text:style-name="P49">We need to dig a little deeper to better understand how transgression and sin are not exactly the same. To do so, lets do a <text:span text:style-name="T59">case study from the Bibl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/>
      <text:p text:style-name="P49"><text:soft-page-break/><text:span text:style-name="T74">The context is</text:span><text:span text:style-name="T73"> Joshua, </text:span><text:span text:style-name="T102">the children of </text:span><text:span text:style-name="T101">Israel, </text:span><text:span text:style-name="T100">and </text:span><text:span text:style-name="T83">the events at </text:span><text:span text:style-name="T73">Jericho and Ai.</text:span></text:p>
      <text:p text:style-name="P49"/>
      <table:table table:name="Table6" table:style-name="Table6">
        <table:table-column table:style-name="Table6.A"/>
        <table:table-row>
          <table:table-cell table:style-name="Table6.A1" office:value-type="string">
            <text:p text:style-name="P89">1 Chronicles 2:7</text:p>
            <text:p text:style-name="P93">And the sons of Carmi; Achar, <text:span text:style-name="T15">the troubler</text:span> of Israel, who <text:span text:style-name="T15">transgressed in the thing accursed</text:span>.</text:p>
          </table:table-cell>
        </table:table-row>
      </table:table>
      <text:p text:style-name="P2"/>
      <text:p text:style-name="P32">In Joshua chapter 7 we learn that Israel is defeated at Ai becaus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3">Joshua 7:<text:span text:style-name="T60">1</text:span></text:p>
            <text:p text:style-name="P71">But the children of Israel <text:span text:style-name="T15">committed a trespass in the accursed thing</text:span>: for Achan, the son of Carmi, the son of Zabdi, the son of Zerah, of the tribe of Judah, <text:span text:style-name="T15">took of the accursed thing</text:span>: and the anger of the LORD was kindled against the children of Israel.</text:p>
          </table:table-cell>
        </table:table-row>
        <table:table-row>
          <table:table-cell table:style-name="Table11.A2" office:value-type="string">
            <text:p text:style-name="P84">Joshua 7:11</text:p>
            <text:p text:style-name="P94">Israel hath <text:span text:style-name="T15">sinned</text:span>, and they have <text:span text:style-name="T15">also transgressed my covenant</text:span> which I commanded them: for they have even <text:span text:style-name="T15">taken of the accursed thing</text:span>, and have also <text:span text:style-name="T15">stolen</text:span>, <text:span text:style-name="T15">and dissembled</text:span> also, and they have <text:span text:style-name="T15">put </text:span><text:span text:style-name="T22">it</text:span><text:span text:style-name="T15"> even among their own stuff</text:span>.</text:p>
          </table:table-cell>
        </table:table-row>
      </table:table>
      <text:p text:style-name="P53">The covenant is detailed in <text:span text:style-name="T1">Exodus 20:1-23:33</text:span><text:span text:style-name="T62">.</text:span></text:p>
      <text:p text:style-name="P26"/>
      <text:p text:style-name="P57"><text:span text:style-name="T30">Note: dissembled </text:span><text:span text:style-name="T33">here </text:span><text:span text:style-name="T30">does not mean to “take apart” or “break into constituent pieces” </text:span><text:span text:style-name="T34">as we might expect </text:span><text:span text:style-name="T35">(dis</text:span><text:span text:style-name="T38">as</text:span><text:span text:style-name="T35">sembled)</text:span><text:span text:style-name="T34">. </text:span><text:span text:style-name="T31">It occurs 3 times in 3 verses (</text:span><text:span text:style-name="T7">Joshua 7:11</text:span><text:span text:style-name="T31">, </text:span><text:span text:style-name="T7">Jeremiah 42:20</text:span><text:span text:style-name="T31">, </text:span><text:span text:style-name="T7">Galatians 2:13</text:span><text:span text:style-name="T31">) </text:span><text:span text:style-name="T32">and </text:span><text:span text:style-name="T31">the biblical usage appears to agree with </text:span><text:span text:style-name="T30">Noah Websters 1828 </text:span><text:span text:style-name="T31">dictionary definition</text:span><text:span text:style-name="T30">:</text:span></text:p>
      <text:p text:style-name="P57"><text:span text:style-name="T30"/></text:p>
      <text:p text:style-name="P58"><text:a xlink:type="simple" xlink:href="https://webstersdictionary1828.com/Dictionary/dissembled" text:style-name="Internet_20_link" text:visited-style-name="Visited_20_Internet_20_Link"><text:span text:style-name="T39">https://webstersdictionary1828.com/Dictionary/dissembled</text:span></text:a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5">DISSEMBLED, participle passive</text:p>
            <text:p text:style-name="P75">Concealed under a false appearance; disguised.</text:p>
          </table:table-cell>
        </table:table-row>
      </table:table>
      <text:p text:style-name="P34"/>
      <text:p text:style-name="P34">In <text:span text:style-name="T1">Joshua 1:18</text:span> we learn that <text:span text:style-name="T99">the officers of the people (v</text:span><text:span text:style-name="T8">10</text:span><text:span text:style-name="T99">,</text:span><text:span text:style-name="T8">16</text:span><text:span text:style-name="T99">) agreed that </text:span><text:span text:style-name="T61">anyone that rebels against the commandment of Joshua shall be put to death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5">Joshua 1:18</text:p>
            <text:p text:style-name="P72">Whosoever <text:span text:style-name="T21">he be</text:span> that doth rebel against thy commandment, and will not hearken unto thy words in all that thou commandest him, he shall be put to death: only be strong and of a good courage.</text:p>
          </table:table-cell>
        </table:table-row>
      </table:table>
      <text:p text:style-name="P35"/>
      <text:p text:style-name="P35">Joshua’s command regarding Jericho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6">Joshua 6:17-19</text:p>
            <text:p text:style-name="P73"><text:span text:style-name="T1">17</text:span> And the city shall be <text:span text:style-name="T15">accursed</text:span>, even it, and <text:span text:style-name="T15">all that are therein</text:span>, to the LORD: only Rahab the harlot shall live, she and all that are with her in the house, because she hid the messengers that we sent.</text:p>
            <text:p text:style-name="P73"><text:span text:style-name="T1">18</text:span> And ye, in any wise <text:span text:style-name="T15">keep yourselves from the accursed thing</text:span>, lest ye make yourselves accursed, when ye take of the accursed thing, and make the camp of Israel a curse, and <text:span text:style-name="T15">trouble it</text:span>.</text:p>
            <text:p text:style-name="P73"><text:span text:style-name="T1">19</text:span> But all the silver, and gold, and vessels of brass and iron, are consecrated unto the LORD: they shall come into the treasury of the LORD.</text:p>
          </table:table-cell>
        </table:table-row>
      </table:table>
      <text:p text:style-name="P16"/>
      <text:list text:style-name="L2">
        <text:list-item>
          <text:p text:style-name="P36">The city and <text:span text:style-name="T65">all that are therein</text:span> are <text:span text:style-name="T65">ac</text:span>cursed <text:span text:style-name="T26">to the LORD</text:span><text:span text:style-name="T65"> </text:span>excepting Rahab and all in her house.</text:p>
        </text:list-item>
        <text:list-item>
          <text:p text:style-name="P37">The silver, gold, and vessels of brass and iron are consecrated <text:span text:style-name="T25">unto the LORD</text:span>.</text:p>
        </text:list-item>
      </text:list>
      <text:p text:style-name="P38"><text:soft-page-break/>Achan’s confession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7">Joshua 7:19-22</text:p>
            <text:p text:style-name="P74"><text:span text:style-name="T1">19</text:span> And Joshua said unto Achan, My son, give, I pray thee, glory to the LORD God of Israel, and make confession unto him; and tell me now what thou hast done; hide it not from me.</text:p>
            <text:p text:style-name="P95"><text:span text:style-name="T6">20</text:span><text:span text:style-name="T29"> And Achan answered Joshua, and said, Indeed </text:span><text:span text:style-name="T36">I have sinned against the LORD God of Israel</text:span><text:span text:style-name="T29">, and thus and thus have I done:</text:span></text:p>
            <text:p text:style-name="P95"><text:span text:style-name="T6">21</text:span><text:span text:style-name="T29"> When I saw among the spoils a goodly Babylonish </text:span><text:span text:style-name="T36">garment</text:span><text:span text:style-name="T29">, and </text:span><text:span text:style-name="T37">two hundred shekels of </text:span><text:span text:style-name="T36">silver</text:span><text:span text:style-name="T29">, and a wedge of </text:span><text:span text:style-name="T36">gold</text:span><text:span text:style-name="T29"> of fifty shekels weight, then </text:span><text:span text:style-name="T36">I coveted them</text:span><text:span text:style-name="T29">, and </text:span><text:span text:style-name="T36">took them</text:span><text:span text:style-name="T29">; and, behold, </text:span><text:span text:style-name="T36">they are hid</text:span><text:span text:style-name="T29"> in the earth in the midst of my tent, and the silver under it.</text:span></text:p>
            <text:p text:style-name="P95"><text:span text:style-name="T6">22</text:span><text:span text:style-name="T29"> So Joshua sent messengers, and they ran unto the tent; and, behold, it was hid in his tent, and the silver under it.</text:span></text:p>
          </table:table-cell>
        </table:table-row>
      </table:table>
      <text:p text:style-name="P38"/>
      <text:list text:style-name="L3">
        <text:list-item>
          <text:p text:style-name="P39">Achan disobeyed Joshua’s command.</text:p>
          <text:list>
            <text:list-item>
              <text:p text:style-name="P39">By taking of the accursed thing (the garment)</text:p>
            </text:list-item>
            <text:list-item>
              <text:p text:style-name="P39">By stealing items consecrated to the LORD <text:span text:style-name="T66">(silver and gold)</text:span></text:p>
            </text:list-item>
          </text:list>
        </text:list-item>
        <text:list-item>
          <text:p text:style-name="P40">Achan transgressed God’s covenant.</text:p>
          <text:list>
            <text:list-item>
              <text:p text:style-name="P40">By <text:span text:style-name="T67">c</text:span>oveting <text:span text:style-name="T66">(</text:span><text:span text:style-name="T69">10</text:span><text:span text:style-name="T70">th</text:span><text:span text:style-name="T69"> commandment, </text:span><text:span text:style-name="T66">inordinate desire)</text:span></text:p>
            </text:list-item>
            <text:list-item>
              <text:p text:style-name="P41">By stealing (<text:span text:style-name="T69">8</text:span><text:span text:style-name="T70">th</text:span><text:span text:style-name="T69"> commandment, </text:span>taking what was not rightfully his)</text:p>
            </text:list-item>
            <text:list-item>
              <text:p text:style-name="P44"><text:span text:style-name="T104">P</text:span>lacing his opinion <text:span text:style-name="T103">above God’s </text:span><text:span text:style-name="T104">(1</text:span><text:span text:style-name="T71">st</text:span><text:span text:style-name="T104"> commandment, making himself god)</text:span></text:p>
            </text:list-item>
            <text:list-item>
              <text:p text:style-name="P44"><text:span text:style-name="T104">Placing his desire for material possessions above his desire for God (2</text:span><text:span text:style-name="T71">nd</text:span><text:span text:style-name="T104"> commandment, </text:span><text:span text:style-name="T68">idolatry).</text:span></text:p>
            </text:list-item>
          </text:list>
        </text:list-item>
        <text:list-item>
          <text:p text:style-name="P42">Achan sinned against God <text:span text:style-name="T84">and thus “</text:span><text:span text:style-name="T10">Israel hath sinned.</text:span><text:span text:style-name="T84">”</text:span></text:p>
          <text:list>
            <text:list-item>
              <text:p text:style-name="P43">Behaving in a way that was unacceptable to God.</text:p>
            </text:list-item>
          </text:list>
        </text:list-item>
      </text:list>
      <text:p text:style-name="P33"/>
      <text:p text:style-name="P50"/>
      <text:p text:style-name="P50">So, putting it all together we can conclude:</text:p>
      <text:p text:style-name="P45"/>
      <text:p text:style-name="P45">Sin is unacceptable behavior before God and to transgress <text:span text:style-name="T107">describes</text:span><text:span text:style-name="T106"> the action </text:span>of “crossing over” the boundaries set by God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/>
      <text:p text:style-name="P48">Extra</text:p>
      <text:p text:style-name="P27"/>
      <text:p text:style-name="P27"><text:span text:style-name="T77">Let’s take a</text:span> moment and look at the word transgression itself and think about it’s constituent parts <text:span text:style-name="T27">and </text:span>things that come to mind from each of them:</text:p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8">trans</text:p>
          </table:table-cell>
          <table:table-cell table:style-name="Table3.B1" office:value-type="string">
            <text:p text:style-name="P78">gression</text:p>
          </table:table-cell>
        </table:table-row>
        <table:table-row>
          <table:table-cell table:style-name="Table3.A2" office:value-type="string">
            <text:p text:style-name="P66">Moving across a border</text:p>
            <text:p text:style-name="P66">(transcontinental)</text:p>
          </table:table-cell>
          <table:table-cell table:style-name="Table3.B2" office:value-type="string">
            <text:p text:style-name="P68">Aggression </text:p>
            <text:p text:style-name="P68"><text:span text:style-name="T53">(</text:span><text:span text:style-name="T49">the opposite of meek</text:span><text:span text:style-name="T77">ness</text:span><text:span text:style-name="T49">)</text:span></text:p>
          </table:table-cell>
        </table:table-row>
        <table:table-row>
          <table:table-cell table:style-name="Table3.A2" office:value-type="string">
            <text:p text:style-name="P66">Moving from one place to another</text:p>
            <text:p text:style-name="P66">(transport)</text:p>
          </table:table-cell>
          <table:table-cell table:style-name="Table3.B2" office:value-type="string">
            <text:p text:style-name="P70">Digression</text:p>
            <text:p text:style-name="P70"><text:span text:style-name="T51">(deviation, straying, </text:span><text:span text:style-name="T52">deviation from a regular course</text:span><text:span text:style-name="T51">)</text:span></text:p>
          </table:table-cell>
        </table:table-row>
        <table:table-row>
          <table:table-cell table:style-name="Table3.A2" office:value-type="string">
            <text:p text:style-name="P67">Transfer from one place to another</text:p>
            <text:p text:style-name="P67">(transmit)</text:p>
          </table:table-cell>
          <table:table-cell table:style-name="Table3.B2" office:value-type="string">
            <text:p text:style-name="P70">Regression</text:p>
            <text:p text:style-name="P70"><text:span text:style-name="T51">(reversion, </text:span><text:span text:style-name="T52">passing back or returning, turning your back to </text:span><text:span text:style-name="T54">something and going the other way</text:span><text:span text:style-name="T51">)</text:span></text:p>
          </table:table-cell>
        </table:table-row>
      </table:table>
      <text:p text:style-name="P30"/>
      <text:p text:style-name="P30">As a <text:span text:style-name="T57">conceptual </text:span>analogue, <text:span text:style-name="T55">lets have a</text:span> look at the formula for work<text:span text:style-name="T56"> </text:span><text:span text:style-name="T50">and substitute </text:span><text:span text:style-name="T86">(or, “Plug and chug” as a friend used to say)</text:span><text:span text:style-name="T50">:</text:span></text:p>
      <text:p text:style-name="P3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work = distance x force</text:p>
          </table:table-cell>
        </table:table-row>
        <table:table-row>
          <table:table-cell table:style-name="Table10.A2" office:value-type="string">
            <text:p text:style-name="P29">transgression = <text:span text:style-name="T50">trans x gression</text:span></text:p>
          </table:table-cell>
        </table:table-row>
        <table:table-row>
          <table:table-cell table:style-name="Table10.A2" office:value-type="string">
            <text:p text:style-name="P69"><text:span text:style-name="T58">t</text:span>ransgression = (<text:span text:style-name="T108">moving</text:span><text:span text:style-name="T58"> </text:span>past an acceptable point) x (aggressively, <text:span text:style-name="T78">forcefully</text:span>)</text:p>
          </table:table-cell>
        </table:table-row>
      </table:table>
      <text:p text:style-name="P27"/>
      <text:p text:style-name="P28">From the word itself, we can learn <text:span text:style-name="T80">quite a bit </text:span><text:span text:style-name="T88">as you can see</text:span><text:span text:style-name="T80">. If we take what we learned earl</text:span><text:span text:style-name="T87">ier</text:span><text:span text:style-name="T80"> from the Bible we can see </text:span>that transgression is “aggressively/<text:span text:style-name="T79">forcefully</text:span> crossing over <text:span text:style-name="T79">an acceptable boundary </text:span><text:span text:style-name="T80">set by God.</text:span>”</text:p>
      <text:p text:style-name="P28"/>
      <text:p text:style-name="P28"/>
      <text:p text:style-name="P28"/>
      <text:p text:style-name="P54"><text:a xlink:type="simple" xlink:href="https://webstersdictionary1828.com/Dictionary/transgress" text:style-name="Internet_20_link" text:visited-style-name="Visited_20_Internet_20_Link">https://webstersdictionary1828.com/Dictionary/transgress</text:a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6">TRANSGRESS', verb transitive [Latin transgressus, transgredior; trans and gradior, to pass.]</text:p>
            <text:p text:style-name="P76"/>
            <text:p text:style-name="P76">1. To pass over or beyond any limit; to surpass.</text:p>
            <text:p text:style-name="P76"/>
            <text:p text:style-name="P76">2. In a moral sense, to overpass any rule prescribed as the limit of duty; to break or violate a law, civil or moral. To transgress a divine law, is sin.</text:p>
            <text:p text:style-name="P76"/>
            <text:p text:style-name="P76">TRANSGRESS', verb intransitive To offend by violating a law; to sin.</text:p>
            <text:p text:style-name="P76"/>
            <text:p text:style-name="P76"><text:span text:style-name="T75">I </text:span>Chron 2.</text:p>
          </table:table-cell>
        </table:table-row>
      </table:table>
      <text:p text:style-name="P46"/>
      <text:p text:style-name="P14"/>
      <text:p text:style-name="P14"/>
      <text:p text:style-name="P51">The first occurrence of transgress*, Strongs definition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6">Strongs: H6588 - pesha` - peh'-shah from 6586; a revolt (national, moral or religious):--rebellion, sin, transgression, trespass. see HEBREW for 06586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09:04:10.694000000</meta:creation-date>
    <dc:date>2024-02-15T13:03:46.743000000</dc:date>
    <meta:editing-duration>PT5H42M10S</meta:editing-duration>
    <meta:editing-cycles>222</meta:editing-cycles>
    <meta:generator>LibreOffice/24.2.0.3$Windows_X86_64 LibreOffice_project/da48488a73ddd66ea24cf16bbc4f7b9c08e9bea1</meta:generator>
    <meta:document-statistic meta:table-count="17" meta:image-count="0" meta:object-count="0" meta:page-count="5" meta:paragraph-count="123" meta:word-count="1734" meta:character-count="9845" meta:non-whitespace-character-count="8246"/>
  </office:meta>
</office:document-meta>
</file>