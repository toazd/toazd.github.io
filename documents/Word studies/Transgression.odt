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7.7in" table:align="margins"/>
    </style:style>
    <style:style style:name="Table7.A" style:family="table-column">
      <style:table-column-properties style:column-width="3.85in" style:rel-column-width="32767*"/>
    </style:style>
    <style:style style:name="Table7.B" style:family="table-column">
      <style:table-column-properties style:column-width="3.8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7in" table:align="margins"/>
    </style:style>
    <style:style style:name="Table5.A" style:family="table-column">
      <style:table-column-properties style:column-width="7.7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7in" table:align="margins"/>
    </style:style>
    <style:style style:name="Table4.A" style:family="table-column">
      <style:table-column-properties style:column-width="7.7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7.7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7in" table:align="margins"/>
    </style:style>
    <style:style style:name="Table9.A" style:family="table-column">
      <style:table-column-properties style:column-width="7.7in" style:rel-column-width="65535*"/>
    </style:style>
    <style:style style:name="Table9.A1" style:family="table-cell">
      <style:table-cell-properties fo:padding="0.0382in" fo:border="0.5pt solid #000000"/>
    </style:style>
    <style:style style:name="Table8" style:family="table">
      <style:table-properties style:width="7.7in" table:align="margins"/>
    </style:style>
    <style:style style:name="Table8.A" style:family="table-column">
      <style:table-column-properties style:column-width="7.7in" style:rel-column-width="65535*"/>
    </style:style>
    <style:style style:name="Table8.A1" style:family="table-cell">
      <style:table-cell-properties fo:padding="0.0382in" fo:border="0.5pt solid #000000"/>
    </style:style>
    <style:style style:name="Table6" style:family="table">
      <style:table-properties style:width="7.7in" table:align="margins"/>
    </style:style>
    <style:style style:name="Table6.A" style:family="table-column">
      <style:table-column-properties style:column-width="7.7in" style:rel-column-width="65535*"/>
    </style:style>
    <style:style style:name="Table6.A1" style:family="table-cell">
      <style:table-cell-properties fo:padding="0.0382in" fo:border="0.5pt solid #000000"/>
    </style:style>
    <style:style style:name="Table11" style:family="table">
      <style:table-properties style:width="7.7in" table:align="margins"/>
    </style:style>
    <style:style style:name="Table11.A" style:family="table-column">
      <style:table-column-properties style:column-width="7.7in" style:rel-column-width="65535*"/>
    </style:style>
    <style:style style:name="Table1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7in" table:align="margins"/>
    </style:style>
    <style:style style:name="Table17.A" style:family="table-column">
      <style:table-column-properties style:column-width="7.7in" style:rel-column-width="65535*"/>
    </style:style>
    <style:style style:name="Table17.A1" style:family="table-cell">
      <style:table-cell-properties fo:padding="0.0382in" fo:border="0.5pt solid #000000"/>
    </style:style>
    <style:style style:name="Table13" style:family="table">
      <style:table-properties style:width="7.7in" table:align="margins"/>
    </style:style>
    <style:style style:name="Table13.A" style:family="table-column">
      <style:table-column-properties style:column-width="7.7in" style:rel-column-width="65535*"/>
    </style:style>
    <style:style style:name="Table13.A1" style:family="table-cell">
      <style:table-cell-properties fo:padding="0.0382in" fo:border="0.5pt solid #000000"/>
    </style:style>
    <style:style style:name="Table16" style:family="table">
      <style:table-properties style:width="7.7in" table:align="margins"/>
    </style:style>
    <style:style style:name="Table16.A" style:family="table-column">
      <style:table-column-properties style:column-width="7.7in" style:rel-column-width="65535*"/>
    </style:style>
    <style:style style:name="Table16.A1" style:family="table-cell">
      <style:table-cell-properties fo:padding="0.0382in" fo:border="0.5pt solid #000000"/>
    </style:style>
    <style:style style:name="Table15" style:family="table">
      <style:table-properties style:width="7.7in" table:align="margins"/>
    </style:style>
    <style:style style:name="Table15.A" style:family="table-column">
      <style:table-column-properties style:column-width="7.7in" style:rel-column-width="65535*"/>
    </style:style>
    <style:style style:name="Table15.A1" style:family="table-cell">
      <style:table-cell-properties fo:padding="0.0382in" fo:border="0.5pt solid #000000"/>
    </style:style>
    <style:style style:name="Table3" style:family="table">
      <style:table-properties style:width="7.7542in" fo:margin-left="0.0375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4.566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7917in" fo:margin-left="-0.0042in" table:align="left"/>
    </style:style>
    <style:style style:name="Table10.A" style:family="table-column">
      <style:table-column-properties style:column-width="7.7917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7in" table:align="margins"/>
    </style:style>
    <style:style style:name="Table12.A" style:family="table-column">
      <style:table-column-properties style:column-width="7.7in" style:rel-column-width="65535*"/>
    </style:style>
    <style:style style:name="Table12.A1" style:family="table-cell">
      <style:table-cell-properties fo:padding="0.0382in" fo:border="0.5pt solid #000000"/>
    </style:style>
    <style:style style:name="Table14" style:family="table">
      <style:table-properties style:width="7.7in" table:align="margins"/>
    </style:style>
    <style:style style:name="Table14.A" style:family="table-column">
      <style:table-column-properties style:column-width="7.7in" style:rel-column-width="65535*"/>
    </style:style>
    <style:style style:name="Table14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ans" fo:font-size="13pt" officeooo:rsid="0004dfc0" officeooo:paragraph-rsid="0004dfc0" style:font-size-asian="13pt" style:font-name-complex="Liberation Sans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e0518" officeooo:paragraph-rsid="003e0518" style:font-size-asian="13pt" style:font-weight-asian="bold" style:font-name-complex="Liberation Sans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3pt" officeooo:rsid="003ff093" officeooo:paragraph-rsid="003ff093" style:font-size-asian="13pt" style:font-name-complex="Liberation Sans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3pt" officeooo:rsid="003e0518" officeooo:paragraph-rsid="003e0518" style:font-size-asian="13pt" style:font-name-complex="Liberation Sans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rsid="0041a8fe" officeooo:paragraph-rsid="0041a8fe" style:font-size-asian="13pt" style:font-name-complex="Liberation San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434ab5" officeooo:paragraph-rsid="00434ab5" style:font-size-asian="13pt" style:font-name-complex="Liberation Sans" style:font-size-complex="13pt"/>
    </style:style>
    <style:style style:name="P7" style:family="paragraph" style:parent-style-name="Standard">
      <style:text-properties style:font-name="Liberation Sans" fo:font-size="10pt" officeooo:rsid="003e0518" officeooo:paragraph-rsid="00473275" style:font-size-asian="10pt" style:font-name-complex="Liberation Sans" style:font-size-complex="10pt"/>
    </style:style>
    <style:style style:name="P8" style:family="paragraph" style:parent-style-name="Standard">
      <style:text-properties style:font-name="Liberation Sans" fo:font-size="13pt" officeooo:rsid="000ad30a" officeooo:paragraph-rsid="000ad30a" style:font-size-asian="13pt" style:font-name-complex="Liberation Sans" style:font-size-complex="13pt"/>
    </style:style>
    <style:style style:name="P9" style:family="paragraph" style:parent-style-name="Table_20_Contents">
      <style:text-properties fo:color="#127622" loext:opacity="100%" style:font-name="Liberation Sans" fo:font-size="13pt" fo:font-weight="bold" officeooo:paragraph-rsid="000cb47d" style:font-size-asian="13pt" style:font-weight-asian="bold" style:font-name-complex="Liberation Sans" style:font-size-complex="13pt" style:font-weight-complex="bold"/>
    </style:style>
    <style:style style:name="P10" style:family="paragraph" style:parent-style-name="Table_20_Contents">
      <style:text-properties style:font-name="Liberation Sans" fo:font-size="13pt" officeooo:paragraph-rsid="000cb47d" style:font-size-asian="13pt" style:font-name-complex="Liberation Sans" style:font-size-complex="13pt"/>
    </style:style>
    <style:style style:name="P11" style:family="paragraph" style:parent-style-name="Table_20_Contents">
      <style:text-properties fo:color="#127622" loext:opacity="100%" style:font-name="Liberation Sans" fo:font-size="13pt" fo:font-weight="bold" officeooo:paragraph-rsid="000ad30a" style:font-size-asian="13pt" style:font-weight-asian="bold" style:font-name-complex="Liberation Sans" style:font-size-complex="13pt" style:font-weight-complex="bold"/>
    </style:style>
    <style:style style:name="P12" style:family="paragraph" style:parent-style-name="Table_20_Contents">
      <style:text-properties style:font-name="Liberation Sans" fo:font-size="13pt" officeooo:paragraph-rsid="000ad30a" style:font-size-asian="13pt" style:font-name-complex="Liberation Sans" style:font-size-complex="13pt"/>
    </style:style>
    <style:style style:name="P13" style:family="paragraph" style:parent-style-name="Table_20_Contents">
      <style:text-properties style:font-name="Liberation Sans" fo:font-size="13pt" officeooo:paragraph-rsid="000ad30a" fo:background-color="#ffff00" style:font-size-asian="13pt" style:font-name-complex="Liberation Sans" style:font-size-complex="13pt"/>
    </style:style>
    <style:style style:name="P14" style:family="paragraph" style:parent-style-name="Standard">
      <style:text-properties style:font-name="Liberation Sans" fo:font-size="13pt" officeooo:rsid="004df884" officeooo:paragraph-rsid="004df884" style:font-size-asian="13pt" style:font-name-complex="Liberation Sans" style:font-size-complex="13pt"/>
    </style:style>
    <style:style style:name="P15" style:family="paragraph" style:parent-style-name="Standard">
      <style:text-properties style:font-name="Liberation Sans" fo:font-size="13pt" officeooo:rsid="0010eed6" officeooo:paragraph-rsid="004aac4f" style:font-size-asian="13pt" style:font-name-complex="Liberation Sans" style:font-size-complex="13pt"/>
    </style:style>
    <style:style style:name="P16" style:family="paragraph" style:parent-style-name="Standard">
      <style:text-properties style:font-name="Liberation Sans" fo:font-size="13pt" officeooo:paragraph-rsid="00202feb" style:font-size-asian="13pt" style:font-size-complex="13pt"/>
    </style:style>
    <style:style style:name="P17" style:family="paragraph" style:parent-style-name="Standard">
      <style:text-properties style:font-name="Liberation Sans" fo:font-size="13pt" officeooo:rsid="004e3f38" officeooo:paragraph-rsid="004e3f38" style:font-size-asian="13pt" style:font-size-complex="13pt"/>
    </style:style>
    <style:style style:name="P18" style:family="paragraph" style:parent-style-name="Standard">
      <style:text-properties style:font-name="Liberation Sans" fo:font-size="13pt" officeooo:rsid="002c2cab" officeooo:paragraph-rsid="004ef68d" style:font-size-asian="13pt" style:font-name-complex="Liberation Sans" style:font-size-complex="13pt"/>
    </style:style>
    <style:style style:name="P19" style:family="paragraph" style:parent-style-name="Table_20_Contents">
      <style:text-properties fo:color="#127622" loext:opacity="100%" style:font-name="Liberation Sans" fo:font-size="13pt" fo:font-weight="bold" officeooo:paragraph-rsid="004ef68d" style:font-size-asian="13pt" style:font-weight-asian="bold" style:font-name-complex="Liberation Sans" style:font-size-complex="13pt" style:font-weight-complex="bold"/>
    </style:style>
    <style:style style:name="P20" style:family="paragraph" style:parent-style-name="Table_20_Contents">
      <style:text-properties fo:color="#d62e4e" loext:opacity="100%" style:font-name="Liberation Sans" fo:font-size="13pt" officeooo:paragraph-rsid="004ef68d" style:font-size-asian="13pt" style:font-name-complex="Liberation Sans" style:font-size-complex="13pt"/>
    </style:style>
    <style:style style:name="P21" style:family="paragraph" style:parent-style-name="Table_20_Contents">
      <style:text-properties style:use-window-font-color="true" loext:opacity="0%" style:font-name="Liberation Sans" fo:font-size="13pt" fo:font-weight="normal" officeooo:paragraph-rsid="004ef68d" style:font-size-asian="13pt" style:font-weight-asian="normal" style:font-name-complex="Liberation Sans" style:font-size-complex="13pt" style:font-weight-complex="normal"/>
    </style:style>
    <style:style style:name="P22" style:family="paragraph" style:parent-style-name="Table_20_Contents">
      <style:text-properties fo:color="#127622" loext:opacity="100%" style:font-name="Liberation Sans" fo:font-size="13pt" fo:font-weight="bold" officeooo:paragraph-rsid="00d03a7f" style:font-size-asian="13pt" style:font-weight-asian="bold" style:font-name-complex="Liberation Sans" style:font-size-complex="13pt" style:font-weight-complex="bold"/>
    </style:style>
    <style:style style:name="P23" style:family="paragraph" style:parent-style-name="Table_20_Contents">
      <style:text-properties style:use-window-font-color="true" loext:opacity="0%" style:font-name="Liberation Sans" fo:font-size="13pt" fo:font-weight="normal" officeooo:paragraph-rsid="00d03a7f" style:font-size-asian="13pt" style:font-weight-asian="normal" style:font-name-complex="Liberation Sans" style:font-size-complex="13pt" style:font-weight-complex="normal"/>
    </style:style>
    <style:style style:name="P24" style:family="paragraph" style:parent-style-name="Standard">
      <style:text-properties style:font-name="Liberation Sans" fo:font-size="13pt" officeooo:rsid="00300dc1" officeooo:paragraph-rsid="00300dc1" style:font-size-asian="13pt" style:font-name-complex="Liberation Sans" style:font-size-complex="13pt"/>
    </style:style>
    <style:style style:name="P25" style:family="paragraph" style:parent-style-name="Table_20_Contents">
      <style:text-properties fo:color="#127622" loext:opacity="100%" style:font-name="Liberation Sans" fo:font-size="13pt" fo:font-weight="bold" officeooo:paragraph-rsid="0036d329" style:font-size-asian="13pt" style:font-weight-asian="bold" style:font-name-complex="Liberation Sans" style:font-size-complex="13pt" style:font-weight-complex="bold"/>
    </style:style>
    <style:style style:name="P26" style:family="paragraph" style:parent-style-name="Table_20_Contents">
      <style:text-properties fo:color="#ff0000" loext:opacity="100%" style:font-name="Liberation Sans" fo:font-size="13pt" fo:font-weight="normal" officeooo:paragraph-rsid="0036d329" style:font-size-asian="13pt" style:font-weight-asian="normal" style:font-name-complex="Liberation Sans" style:font-size-complex="13pt" style:font-weight-complex="normal"/>
    </style:style>
    <style:style style:name="P27" style:family="paragraph" style:parent-style-name="Table_20_Contents">
      <style:text-properties fo:color="#127622" loext:opacity="100%" style:font-name="Liberation Sans" fo:font-size="13pt" fo:font-weight="bold" officeooo:paragraph-rsid="00300dc1" style:font-size-asian="13pt" style:font-weight-asian="bold" style:font-name-complex="Liberation Sans" style:font-size-complex="13pt" style:font-weight-complex="bold"/>
    </style:style>
    <style:style style:name="P28" style:family="paragraph" style:parent-style-name="Table_20_Contents">
      <style:text-properties fo:color="#ff0000" loext:opacity="100%" style:font-name="Liberation Sans" fo:font-size="13pt" officeooo:paragraph-rsid="00300dc1" style:font-size-asian="13pt" style:font-name-complex="Liberation Sans" style:font-size-complex="13pt"/>
    </style:style>
    <style:style style:name="P29" style:family="paragraph" style:parent-style-name="Standard">
      <style:text-properties style:font-name="Liberation Sans" fo:font-size="13pt" officeooo:rsid="00564b78" officeooo:paragraph-rsid="00d3280c" style:font-size-asian="13pt" style:font-name-complex="Liberation Sans" style:font-size-complex="13pt"/>
    </style:style>
    <style:style style:name="P30" style:family="paragraph" style:parent-style-name="Table_20_Contents">
      <style:text-properties fo:color="#127622" loext:opacity="100%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31" style:family="paragraph" style:parent-style-name="Table_20_Contents">
      <style:text-properties style:font-name="Liberation Sans" fo:font-size="13pt" officeooo:paragraph-rsid="00564b78" style:font-size-asian="13pt" style:font-name-complex="Liberation Sans" style:font-size-complex="13pt"/>
    </style:style>
    <style:style style:name="P32" style:family="paragraph" style:parent-style-name="Standard">
      <style:text-properties style:font-name="Liberation Sans" fo:font-size="13pt" officeooo:rsid="00300dc1" officeooo:paragraph-rsid="005b08ec" style:font-size-asian="13pt" style:font-name-complex="Liberation Sans" style:font-size-complex="13pt"/>
    </style:style>
    <style:style style:name="P33" style:family="paragraph" style:parent-style-name="Standard">
      <style:text-properties style:font-name="Liberation Sans" fo:font-size="13pt" officeooo:rsid="004fc82f" officeooo:paragraph-rsid="004fc82f" style:font-size-asian="13pt" style:font-name-complex="Liberation Sans" style:font-size-complex="13pt"/>
    </style:style>
    <style:style style:name="P34" style:family="paragraph" style:parent-style-name="Table_20_Contents">
      <style:text-properties fo:color="#127622" loext:opacity="100%" style:font-name="Liberation Sans" fo:font-size="13pt" fo:font-weight="bold" officeooo:paragraph-rsid="0042a3fe" style:font-size-asian="13pt" style:font-weight-asian="bold" style:font-name-complex="Liberation Sans" style:font-size-complex="13pt" style:font-weight-complex="bold"/>
    </style:style>
    <style:style style:name="P35" style:family="paragraph" style:parent-style-name="Table_20_Contents">
      <style:text-properties style:font-name="Liberation Sans" fo:font-size="13pt" officeooo:paragraph-rsid="0042a3fe" style:font-size-asian="13pt" style:font-name-complex="Liberation Sans" style:font-size-complex="13pt"/>
    </style:style>
    <style:style style:name="P36" style:family="paragraph" style:parent-style-name="Standard">
      <style:text-properties style:font-name="Liberation Sans" fo:font-size="13pt" officeooo:rsid="0067368c" officeooo:paragraph-rsid="002958fc" style:font-size-asian="13pt" style:font-name-complex="Liberation Sans" style:font-size-complex="13pt"/>
    </style:style>
    <style:style style:name="P37" style:family="paragraph" style:parent-style-name="Standard">
      <style:text-properties style:font-name="Liberation Sans" fo:font-size="13pt" officeooo:rsid="00d8bfd8" officeooo:paragraph-rsid="00d8bfd8" style:font-size-asian="13pt" style:font-name-complex="Liberation Sans" style:font-size-complex="13pt"/>
    </style:style>
    <style:style style:name="P38" style:family="paragraph" style:parent-style-name="Standard">
      <style:text-properties style:font-name="Liberation Sans" fo:font-size="13pt" officeooo:rsid="0039b3f7" officeooo:paragraph-rsid="005b08ec" style:font-size-asian="13pt" style:font-name-complex="Liberation Sans" style:font-size-complex="13pt"/>
    </style:style>
    <style:style style:name="P39" style:family="paragraph" style:parent-style-name="Table_20_Contents">
      <style:text-properties fo:color="#127622" loext:opacity="100%" style:text-line-through-style="none" style:text-line-through-type="none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40" style:family="paragraph" style:parent-style-name="Table_20_Contents">
      <style:text-properties style:text-line-through-style="none" style:text-line-through-type="none" style:font-name="Liberation Sans" fo:font-size="13pt" officeooo:paragraph-rsid="00564b78" style:font-size-asian="13pt" style:font-name-complex="Liberation Sans" style:font-size-complex="13pt"/>
    </style:style>
    <style:style style:name="P41" style:family="paragraph" style:parent-style-name="Standard">
      <style:text-properties style:font-name="Liberation Sans" fo:font-size="13pt" officeooo:rsid="0004dfc0" officeooo:paragraph-rsid="002958fc" style:font-size-asian="13pt" style:font-name-complex="Liberation Sans" style:font-size-complex="13pt"/>
    </style:style>
    <style:style style:name="P42" style:family="paragraph" style:parent-style-name="Standard">
      <style:text-properties style:font-name="Liberation Sans" fo:font-size="13pt" officeooo:rsid="0072a1e5" officeooo:paragraph-rsid="0072a1e5" style:font-size-asian="13pt" style:font-name-complex="Liberation Sans" style:font-size-complex="13pt"/>
    </style:style>
    <style:style style:name="P43" style:family="paragraph" style:parent-style-name="Table_20_Contents">
      <style:text-properties fo:color="#127622" loext:opacity="100%" style:font-name="Liberation Sans" fo:font-size="13pt" fo:font-weight="bold" officeooo:paragraph-rsid="0072a1e5" style:font-size-asian="13pt" style:font-weight-asian="bold" style:font-name-complex="Liberation Sans" style:font-size-complex="13pt" style:font-weight-complex="bold"/>
    </style:style>
    <style:style style:name="P44" style:family="paragraph" style:parent-style-name="Table_20_Contents">
      <style:text-properties style:font-name="Liberation Sans" fo:font-size="13pt" officeooo:paragraph-rsid="0072a1e5" style:font-size-asian="13pt" style:font-name-complex="Liberation Sans" style:font-size-complex="13pt"/>
    </style:style>
    <style:style style:name="P45" style:family="paragraph" style:parent-style-name="Table_20_Contents">
      <style:text-properties fo:color="#127622" loext:opacity="100%" style:font-name="Liberation Sans" fo:font-size="13pt" fo:font-weight="bold" officeooo:paragraph-rsid="007ca689" style:font-size-asian="13pt" style:font-weight-asian="bold" style:font-name-complex="Liberation Sans" style:font-size-complex="13pt" style:font-weight-complex="bold"/>
    </style:style>
    <style:style style:name="P46" style:family="paragraph" style:parent-style-name="Table_20_Contents">
      <style:text-properties fo:color="#ff0000" loext:opacity="100%" style:font-name="Liberation Sans" fo:font-size="13pt" fo:font-weight="normal" officeooo:paragraph-rsid="007ca689" style:font-size-asian="13pt" style:font-weight-asian="normal" style:font-name-complex="Liberation Sans" style:font-size-complex="13pt" style:font-weight-complex="normal"/>
    </style:style>
    <style:style style:name="P47" style:family="paragraph" style:parent-style-name="Standard">
      <style:text-properties style:font-name="Liberation Sans" fo:font-size="10pt" officeooo:rsid="0088d4ee" officeooo:paragraph-rsid="008b85c7" style:font-size-asian="10pt" style:font-name-complex="Liberation Sans" style:font-size-complex="10pt"/>
    </style:style>
    <style:style style:name="P48" style:family="paragraph" style:parent-style-name="Standard">
      <style:text-properties style:font-name="Liberation Sans" fo:font-size="13pt" officeooo:rsid="0039b3f7" officeooo:paragraph-rsid="008b85c7" style:font-size-asian="13pt" style:font-name-complex="Liberation Sans" style:font-size-complex="13pt"/>
    </style:style>
    <style:style style:name="P49" style:family="paragraph" style:parent-style-name="Standard">
      <style:text-properties officeooo:paragraph-rsid="0096cd8a"/>
    </style:style>
    <style:style style:name="P50" style:family="paragraph" style:parent-style-name="Standard">
      <style:text-properties fo:font-size="10pt" officeooo:paragraph-rsid="0096cd8a" style:font-size-asian="10pt" style:font-size-complex="10pt"/>
    </style:style>
    <style:style style:name="P51" style:family="paragraph" style:parent-style-name="Table_20_Contents">
      <style:text-properties style:font-name="Liberation Sans" fo:font-size="13pt" officeooo:paragraph-rsid="0096cd8a" style:font-size-asian="13pt" style:font-name-complex="Liberation Sans" style:font-size-complex="13pt"/>
    </style:style>
    <style:style style:name="P52" style:family="paragraph" style:parent-style-name="Standard">
      <style:text-properties style:font-name="Liberation Sans" fo:font-size="13pt" officeooo:rsid="0080b1a6" officeooo:paragraph-rsid="008d9c09" style:font-size-asian="13pt" style:font-name-complex="Liberation Sans" style:font-size-complex="13pt"/>
    </style:style>
    <style:style style:name="P53" style:family="paragraph" style:parent-style-name="Table_20_Contents">
      <style:text-properties fo:color="#127622" loext:opacity="100%" style:font-name="Liberation Sans" fo:font-size="13pt" fo:font-weight="bold" officeooo:paragraph-rsid="008d9c09" style:font-size-asian="13pt" style:font-weight-asian="bold" style:font-name-complex="Liberation Sans" style:font-size-complex="13pt" style:font-weight-complex="bold"/>
    </style:style>
    <style:style style:name="P54" style:family="paragraph" style:parent-style-name="Table_20_Contents">
      <style:text-properties style:font-name="Liberation Sans" fo:font-size="13pt" officeooo:paragraph-rsid="008d9c09" style:font-size-asian="13pt" style:font-name-complex="Liberation Sans" style:font-size-complex="13pt"/>
    </style:style>
    <style:style style:name="P55" style:family="paragraph" style:parent-style-name="Standard">
      <style:text-properties style:font-name="Liberation Sans" fo:font-size="13pt" officeooo:rsid="00863202" officeooo:paragraph-rsid="0090d6a6" style:font-size-asian="13pt" style:font-name-complex="Liberation Sans" style:font-size-complex="13pt"/>
    </style:style>
    <style:style style:name="P56" style:family="paragraph" style:parent-style-name="Table_20_Contents">
      <style:text-properties fo:color="#127622" loext:opacity="100%" style:font-name="Liberation Sans" fo:font-size="13pt" fo:font-weight="bold" officeooo:paragraph-rsid="0090d6a6" style:font-size-asian="13pt" style:font-weight-asian="bold" style:font-name-complex="Liberation Sans" style:font-size-complex="13pt" style:font-weight-complex="bold"/>
    </style:style>
    <style:style style:name="P57" style:family="paragraph" style:parent-style-name="Table_20_Contents">
      <style:text-properties style:font-name="Liberation Sans" fo:font-size="13pt" officeooo:paragraph-rsid="0090d6a6" style:font-size-asian="13pt" style:font-name-complex="Liberation Sans" style:font-size-complex="13pt"/>
    </style:style>
    <style:style style:name="P58" style:family="paragraph" style:parent-style-name="Standard">
      <style:text-properties style:font-name="Liberation Sans" fo:font-size="13pt" officeooo:rsid="0004dfc0" officeooo:paragraph-rsid="0090d6a6" style:font-size-asian="13pt" style:font-name-complex="Liberation Sans" style:font-size-complex="13pt"/>
    </style:style>
    <style:style style:name="P59" style:family="paragraph" style:parent-style-name="Standard" style:list-style-name="L1">
      <style:text-properties style:font-name="Liberation Sans" fo:font-size="13pt" officeooo:rsid="0090d6a6" officeooo:paragraph-rsid="0090d6a6" style:font-size-asian="13pt" style:font-name-complex="Liberation Sans" style:font-size-complex="13pt"/>
    </style:style>
    <style:style style:name="P60" style:family="paragraph" style:parent-style-name="Standard" style:list-style-name="L1">
      <style:text-properties style:font-name="Liberation Sans" fo:font-size="13pt" officeooo:rsid="00924a4c" officeooo:paragraph-rsid="00924a4c" style:font-size-asian="13pt" style:font-name-complex="Liberation Sans" style:font-size-complex="13pt"/>
    </style:style>
    <style:style style:name="P61" style:family="paragraph" style:parent-style-name="Standard">
      <style:text-properties style:font-name="Liberation Sans" fo:font-size="13pt" officeooo:rsid="0092b165" officeooo:paragraph-rsid="0092b165" style:font-size-asian="13pt" style:font-name-complex="Liberation Sans" style:font-size-complex="13pt"/>
    </style:style>
    <style:style style:name="P62" style:family="paragraph" style:parent-style-name="Table_20_Contents">
      <style:text-properties fo:color="#127622" loext:opacity="100%" style:font-name="Liberation Sans" fo:font-size="13pt" fo:font-weight="bold" officeooo:paragraph-rsid="00939ce5" style:font-size-asian="13pt" style:font-weight-asian="bold" style:font-name-complex="Liberation Sans" style:font-size-complex="13pt" style:font-weight-complex="bold"/>
    </style:style>
    <style:style style:name="P63" style:family="paragraph" style:parent-style-name="Table_20_Contents">
      <style:text-properties style:font-name="Liberation Sans" fo:font-size="13pt" officeooo:paragraph-rsid="00939ce5" style:font-size-asian="13pt" style:font-name-complex="Liberation Sans" style:font-size-complex="13pt"/>
    </style:style>
    <style:style style:name="P64" style:family="paragraph" style:parent-style-name="Table_20_Contents">
      <style:text-properties officeooo:paragraph-rsid="00939ce5"/>
    </style:style>
    <style:style style:name="P65" style:family="paragraph" style:parent-style-name="Standard" style:list-style-name="L2">
      <style:text-properties style:font-name="Liberation Sans" fo:font-size="13pt" officeooo:rsid="009518de" officeooo:paragraph-rsid="009518de" style:font-size-asian="13pt" style:font-name-complex="Liberation Sans" style:font-size-complex="13pt"/>
    </style:style>
    <style:style style:name="P66" style:family="paragraph" style:parent-style-name="Standard" style:list-style-name="L2">
      <style:text-properties style:font-name="Liberation Sans" fo:font-size="13pt" officeooo:rsid="0095ec6f" officeooo:paragraph-rsid="0095ec6f" style:font-size-asian="13pt" style:font-name-complex="Liberation Sans" style:font-size-complex="13pt"/>
    </style:style>
    <style:style style:name="P67" style:family="paragraph" style:parent-style-name="Standard" style:list-style-name="L2">
      <style:text-properties style:font-name="Liberation Sans" fo:font-size="13pt" officeooo:rsid="009a513c" officeooo:paragraph-rsid="009a513c" style:font-size-asian="13pt" style:font-name-complex="Liberation Sans" style:font-size-complex="13pt"/>
    </style:style>
    <style:style style:name="P68" style:family="paragraph" style:parent-style-name="Standard" style:list-style-name="L2">
      <style:text-properties style:font-name="Liberation Sans" fo:font-size="13pt" officeooo:rsid="009dfc6e" officeooo:paragraph-rsid="00e69ac7" style:font-size-asian="13pt" style:font-name-complex="Liberation Sans" style:font-size-complex="13pt"/>
    </style:style>
    <style:style style:name="P69" style:family="paragraph" style:parent-style-name="Standard" style:list-style-name="L2">
      <style:text-properties style:font-name="Liberation Sans" fo:font-size="13pt" officeooo:rsid="009af2fe" officeooo:paragraph-rsid="009af2fe" style:font-size-asian="13pt" style:font-name-complex="Liberation Sans" style:font-size-complex="13pt"/>
    </style:style>
    <style:style style:name="P70" style:family="paragraph" style:parent-style-name="Standard" style:list-style-name="L2">
      <style:text-properties style:font-name="Liberation Sans" fo:font-size="13pt" officeooo:rsid="009c2897" officeooo:paragraph-rsid="009c2897" style:font-size-asian="13pt" style:font-name-complex="Liberation Sans" style:font-size-complex="13pt"/>
    </style:style>
    <style:style style:name="P71" style:family="paragraph" style:parent-style-name="Standard">
      <style:text-properties style:font-name="Liberation Sans" fo:font-size="13pt" officeooo:rsid="00803d37" officeooo:paragraph-rsid="009046e9" style:font-size-asian="13pt" style:font-name-complex="Liberation Sans" style:font-size-complex="13pt"/>
    </style:style>
    <style:style style:name="P72" style:family="paragraph" style:parent-style-name="Standard">
      <style:text-properties style:font-name="Liberation Sans" fo:font-size="13pt" officeooo:rsid="00ea021a" officeooo:paragraph-rsid="00ea021a" style:font-size-asian="13pt" style:font-name-complex="Liberation Sans" style:font-size-complex="13pt"/>
    </style:style>
    <style:style style:name="P73" style:family="paragraph" style:parent-style-name="Standard">
      <style:text-properties style:font-name="Liberation Sans" fo:font-size="13pt" officeooo:rsid="00ae3e12" officeooo:paragraph-rsid="00ae3e12" style:font-size-asian="13pt" style:font-name-complex="Liberation Sans" style:font-size-complex="13pt"/>
    </style:style>
    <style:style style:name="P74" style:family="paragraph" style:parent-style-name="Standard">
      <style:text-properties style:font-name="Liberation Sans" fo:font-size="13pt" officeooo:rsid="00052e07" officeooo:paragraph-rsid="009046e9" style:font-size-asian="13pt" style:font-name-complex="Liberation Sans" style:font-size-complex="13pt"/>
    </style:style>
    <style:style style:name="P75" style:family="paragraph" style:parent-style-name="Standard"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76" style:family="paragraph" style:parent-style-name="Standard">
      <style:paragraph-properties fo:break-before="page"/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77" style:family="paragraph" style:parent-style-name="Standard">
      <style:text-properties style:font-name="Liberation Sans" fo:font-size="13pt" officeooo:rsid="0039b3f7" officeooo:paragraph-rsid="00a44ad6" style:font-size-asian="13pt" style:font-name-complex="Liberation Sans" style:font-size-complex="13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9b3f7" officeooo:paragraph-rsid="00a44ad6" style:font-size-asian="13pt" style:font-weight-asian="bold" style:font-name-complex="Liberation Sans" style:font-size-complex="13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3pt" officeooo:rsid="003b0301" officeooo:paragraph-rsid="00a44ad6" style:font-size-asian="13pt" style:font-name-complex="Liberation Sans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3pt" officeooo:rsid="005b08ec" officeooo:paragraph-rsid="00a44ad6" style:font-size-asian="13pt" style:font-name-complex="Liberation Sans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3pt" officeooo:rsid="0061b62a" officeooo:paragraph-rsid="00a44ad6" style:font-size-asian="13pt" style:font-name-complex="Liberation Sans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3pt" officeooo:rsid="003c49bb" officeooo:paragraph-rsid="00a44ad6" style:font-size-asian="13pt" style:font-name-complex="Liberation Sans" style:font-size-complex="13pt"/>
    </style:style>
    <style:style style:name="P83" style:family="paragraph" style:parent-style-name="Standard"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3pt" officeooo:rsid="00609203" officeooo:paragraph-rsid="00a44ad6" style:font-size-asian="13pt" style:font-name-complex="Liberation Sans" style:font-size-complex="13pt"/>
    </style:style>
    <style:style style:name="P86" style:family="paragraph" style:parent-style-name="Standard">
      <style:text-properties style:font-name="Liberation Sans" fo:font-size="13pt" officeooo:rsid="005e2045" officeooo:paragraph-rsid="00a44ad6" style:font-size-asian="13pt" style:font-name-complex="Liberation Sans" style:font-size-complex="13pt"/>
    </style:style>
    <style:style style:name="P87" style:family="paragraph" style:parent-style-name="Standard">
      <style:text-properties style:font-name="Liberation Sans" fo:font-size="10pt" officeooo:rsid="00ae3e12" officeooo:paragraph-rsid="00ea021a" style:font-size-asian="10pt" style:font-name-complex="Liberation Sans" style:font-size-complex="10pt"/>
    </style:style>
    <style:style style:name="P88" style:family="paragraph" style:parent-style-name="Table_20_Contents">
      <style:text-properties style:font-name="Liberation Sans" fo:font-size="13pt" officeooo:paragraph-rsid="00ea021a" style:font-size-asian="13pt" style:font-name-complex="Liberation Sans" style:font-size-complex="13pt"/>
    </style:style>
    <style:style style:name="P89" style:family="paragraph" style:parent-style-name="Standard">
      <style:text-properties style:font-name="Liberation Sans" fo:font-size="13pt" officeooo:rsid="00ae3e12" officeooo:paragraph-rsid="00ea021a" style:font-size-asian="13pt" style:font-name-complex="Liberation Sans" style:font-size-complex="13pt"/>
    </style:style>
    <style:style style:name="P90" style:family="paragraph" style:parent-style-name="Standard">
      <style:text-properties style:font-name="Liberation Sans" fo:font-size="13pt" officeooo:rsid="00052e07" officeooo:paragraph-rsid="00ea021a" style:font-size-asian="13pt" style:font-name-complex="Liberation Sans" style:font-size-complex="13pt"/>
    </style:style>
    <style:style style:name="P91" style:family="paragraph" style:parent-style-name="Standard">
      <style:text-properties style:font-name="Liberation Sans" fo:font-size="13pt" officeooo:rsid="00eca002" officeooo:paragraph-rsid="00eca002" style:font-size-asian="13pt" style:font-name-complex="Liberation Sans" style:font-size-complex="13pt"/>
    </style:style>
    <style:style style:name="T1" style:family="text">
      <style:text-properties officeooo:rsid="00c04a89"/>
    </style:style>
    <style:style style:name="T2" style:family="text">
      <style:text-properties officeooo:rsid="00c3d2d2"/>
    </style:style>
    <style:style style:name="T3" style:family="text">
      <style:text-properties officeooo:rsid="00473275"/>
    </style:style>
    <style:style style:name="T4" style:family="text">
      <style:text-properties officeooo:rsid="00c1db10"/>
    </style:style>
    <style:style style:name="T5" style:family="text">
      <style:text-properties officeooo:rsid="003e0518"/>
    </style:style>
    <style:style style:name="T6" style:family="text">
      <style:text-properties fo:color="#127622" loext:opacity="100%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e3e818"/>
    </style:style>
    <style:style style:name="T9" style:family="text">
      <style:text-properties style:use-window-font-color="true" loext:opacity="0%" officeooo:rsid="00e4e63e"/>
    </style:style>
    <style:style style:name="T10" style:family="text">
      <style:text-properties fo:color="#ff0000" loext:opacity="100%"/>
    </style:style>
    <style:style style:name="T11" style:family="text">
      <style:text-properties officeooo:rsid="0049fa7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c371fe"/>
    </style:style>
    <style:style style:name="T14" style:family="text">
      <style:text-properties officeooo:rsid="004aac4f"/>
    </style:style>
    <style:style style:name="T15" style:family="text">
      <style:text-properties officeooo:rsid="00121f9a"/>
    </style:style>
    <style:style style:name="T16" style:family="text">
      <style:text-properties officeooo:rsid="0012a573"/>
    </style:style>
    <style:style style:name="T17" style:family="text">
      <style:text-properties officeooo:rsid="0014892d"/>
    </style:style>
    <style:style style:name="T18" style:family="text">
      <style:text-properties officeooo:rsid="001d9122"/>
    </style:style>
    <style:style style:name="T19" style:family="text">
      <style:text-properties officeooo:rsid="0023e764"/>
    </style:style>
    <style:style style:name="T20" style:family="text">
      <style:text-properties officeooo:rsid="001db840"/>
    </style:style>
    <style:style style:name="T21" style:family="text">
      <style:text-properties fo:color="#127622" loext:opacity="100%" officeooo:rsid="001db840"/>
    </style:style>
    <style:style style:name="T22" style:family="text">
      <style:text-properties fo:color="#127622" loext:opacity="100%" officeooo:rsid="004cde4a"/>
    </style:style>
    <style:style style:name="T23" style:family="text">
      <style:text-properties fo:color="#d62e4e" loext:opacity="100%" fo:font-weight="bold" officeooo:rsid="00202feb" style:font-weight-asian="bold" style:font-name-complex="Liberation Sans" style:font-weight-complex="bold"/>
    </style:style>
    <style:style style:name="T24" style:family="text">
      <style:text-properties officeooo:rsid="00b4726c"/>
    </style:style>
    <style:style style:name="T25" style:family="text">
      <style:text-properties officeooo:rsid="00b4c8ab"/>
    </style:style>
    <style:style style:name="T26" style:family="text">
      <style:text-properties officeooo:rsid="004ef68d"/>
    </style:style>
    <style:style style:name="T27" style:family="text">
      <style:text-properties fo:color="#127622" loext:opacity="100%" officeooo:rsid="005110ce"/>
    </style:style>
    <style:style style:name="T28" style:family="text">
      <style:text-properties officeooo:rsid="00505298"/>
    </style:style>
    <style:style style:name="T29" style:family="text">
      <style:text-properties officeooo:rsid="002db368"/>
    </style:style>
    <style:style style:name="T30" style:family="text">
      <style:text-properties officeooo:rsid="002c2cab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127622" loext:opacity="100%" officeooo:rsid="0036d329"/>
    </style:style>
    <style:style style:name="T34" style:family="text">
      <style:text-properties officeooo:rsid="0051ba0e"/>
    </style:style>
    <style:style style:name="T35" style:family="text">
      <style:text-properties officeooo:rsid="00c573bf"/>
    </style:style>
    <style:style style:name="T36" style:family="text">
      <style:text-properties officeooo:rsid="00d17417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d3280c"/>
    </style:style>
    <style:style style:name="T39" style:family="text">
      <style:text-properties officeooo:rsid="00d4bc7a"/>
    </style:style>
    <style:style style:name="T40" style:family="text">
      <style:text-properties officeooo:rsid="0057bd5f"/>
    </style:style>
    <style:style style:name="T41" style:family="text">
      <style:text-properties officeooo:rsid="00d5c1c0"/>
    </style:style>
    <style:style style:name="T42" style:family="text">
      <style:text-properties officeooo:rsid="00d7725f"/>
    </style:style>
    <style:style style:name="T43" style:family="text">
      <style:text-properties officeooo:rsid="0052fe75"/>
    </style:style>
    <style:style style:name="T44" style:family="text">
      <style:text-properties officeooo:rsid="00594213"/>
    </style:style>
    <style:style style:name="T45" style:family="text">
      <style:text-properties officeooo:rsid="0072a1e5"/>
    </style:style>
    <style:style style:name="T46" style:family="text">
      <style:text-properties officeooo:rsid="00ab7475"/>
    </style:style>
    <style:style style:name="T47" style:family="text">
      <style:text-properties officeooo:rsid="00a7c85c"/>
    </style:style>
    <style:style style:name="T48" style:family="text">
      <style:text-properties officeooo:rsid="00e1d2bb"/>
    </style:style>
    <style:style style:name="T49" style:family="text">
      <style:text-properties officeooo:rsid="00dff3e0"/>
    </style:style>
    <style:style style:name="T50" style:family="text">
      <style:text-properties officeooo:rsid="00de6f1f"/>
    </style:style>
    <style:style style:name="T51" style:family="text">
      <style:text-properties officeooo:rsid="00b765cb"/>
    </style:style>
    <style:style style:name="T52" style:family="text">
      <style:text-properties officeooo:rsid="0073671c"/>
    </style:style>
    <style:style style:name="T53" style:family="text">
      <style:text-properties fo:font-style="italic" fo:background-color="#ffff00" loext:char-shading-value="0" style:font-style-asian="italic" style:font-style-complex="italic"/>
    </style:style>
    <style:style style:name="T54" style:family="text">
      <style:text-properties style:font-name="Liberation Sans" fo:font-size="13pt" officeooo:rsid="0096cd8a" style:font-size-asian="13pt" style:font-name-complex="Liberation Sans" style:font-size-complex="13pt"/>
    </style:style>
    <style:style style:name="T55" style:family="text">
      <style:text-properties style:font-name="Liberation Sans" fo:font-size="13pt" officeooo:rsid="009a181e" style:font-size-asian="13pt" style:font-name-complex="Liberation Sans" style:font-size-complex="13pt"/>
    </style:style>
    <style:style style:name="T56" style:family="text">
      <style:text-properties style:font-name="Liberation Sans" fo:font-size="13pt" officeooo:rsid="00a95908" style:font-size-asian="13pt" style:font-name-complex="Liberation Sans" style:font-size-complex="13pt"/>
    </style:style>
    <style:style style:name="T57" style:family="text">
      <style:text-properties style:font-name="Liberation Sans" fo:font-size="13pt" officeooo:rsid="00d9f08d" style:font-size-asian="13pt" style:font-name-complex="Liberation Sans" style:font-size-complex="13pt"/>
    </style:style>
    <style:style style:name="T58" style:family="text">
      <style:text-properties style:font-name="Liberation Sans" fo:font-size="13pt" style:text-underline-style="solid" style:text-underline-width="auto" style:text-underline-color="font-color" officeooo:rsid="00d9f08d" style:font-size-asian="13pt" style:font-name-complex="Liberation Sans" style:font-size-complex="13pt"/>
    </style:style>
    <style:style style:name="T59" style:family="text">
      <style:text-properties style:font-name="Liberation Sans" fo:font-size="13pt" officeooo:rsid="0097447e" style:font-size-asian="13pt" style:font-name-complex="Liberation Sans" style:font-size-complex="13pt"/>
    </style:style>
    <style:style style:name="T60" style:family="text">
      <style:text-properties fo:color="#127622" loext:opacity="100%" style:font-name="Liberation Sans" fo:font-size="13pt" officeooo:rsid="0097447e" style:font-size-asian="13pt" style:font-name-complex="Liberation Sans" style:font-size-complex="13pt"/>
    </style:style>
    <style:style style:name="T61" style:family="text">
      <style:text-properties style:font-name="Liberation Sans" fo:font-size="13pt" officeooo:rsid="0097febb" style:font-size-asian="13pt" style:font-name-complex="Liberation Sans" style:font-size-complex="13pt"/>
    </style:style>
    <style:style style:name="T62" style:family="text">
      <style:text-properties style:font-name="Liberation Sans" officeooo:rsid="0096cd8a" style:font-name-complex="Liberation Sans"/>
    </style:style>
    <style:style style:name="T63" style:family="text">
      <style:text-properties officeooo:rsid="00dc9eb8"/>
    </style:style>
    <style:style style:name="T64" style:family="text">
      <style:text-properties fo:color="#127622" loext:opacity="100%" officeooo:rsid="00dc9eb8"/>
    </style:style>
    <style:style style:name="T65" style:family="text">
      <style:text-properties officeooo:rsid="008250ab"/>
    </style:style>
    <style:style style:name="T66" style:family="text">
      <style:text-properties officeooo:rsid="00924a4c"/>
    </style:style>
    <style:style style:name="T67" style:family="text">
      <style:text-properties style:text-underline-style="solid" style:text-underline-width="auto" style:text-underline-color="font-color" officeooo:rsid="00924a4c"/>
    </style:style>
    <style:style style:name="T68" style:family="text">
      <style:text-properties fo:color="#127622" loext:opacity="100%" style:font-name="Liberation Sans" fo:font-size="13pt" style:font-size-asian="13pt" style:font-name-complex="Liberation Sans" style:font-size-complex="13pt"/>
    </style:style>
    <style:style style:name="T69" style:family="text">
      <style:text-properties style:font-name="Liberation Sans" fo:font-size="13pt" style:font-size-asian="13pt" style:font-name-complex="Liberation Sans" style:font-size-complex="13pt"/>
    </style:style>
    <style:style style:name="T70" style:family="text">
      <style:text-properties style:font-name="Liberation Sans" fo:font-size="13pt" fo:background-color="#ffff00" loext:char-shading-value="0" style:font-size-asian="13pt" style:font-name-complex="Liberation Sans" style:font-size-complex="13pt"/>
    </style:style>
    <style:style style:name="T71" style:family="text">
      <style:text-properties style:font-name="Liberation Sans" fo:font-size="13pt" fo:background-color="transparent" loext:char-shading-value="0" style:font-size-asian="13pt" style:font-name-complex="Liberation Sans" style:font-size-complex="13pt"/>
    </style:style>
    <style:style style:name="T72" style:family="text">
      <style:text-properties officeooo:rsid="009a513c"/>
    </style:style>
    <style:style style:name="T73" style:family="text">
      <style:text-properties officeooo:rsid="009af2fe"/>
    </style:style>
    <style:style style:name="T74" style:family="text">
      <style:text-properties officeooo:rsid="00a023e6"/>
    </style:style>
    <style:style style:name="T75" style:family="text">
      <style:text-properties style:text-position="super 58%" officeooo:rsid="00a023e6"/>
    </style:style>
    <style:style style:name="T76" style:family="text">
      <style:text-properties officeooo:rsid="00e917ba"/>
    </style:style>
    <style:style style:name="T77" style:family="text">
      <style:text-properties officeooo:rsid="00e69ac7"/>
    </style:style>
    <style:style style:name="T78" style:family="text">
      <style:text-properties style:text-position="super 58%" officeooo:rsid="00e917ba"/>
    </style:style>
    <style:style style:name="T79" style:family="text">
      <style:text-properties officeooo:rsid="009f1110"/>
    </style:style>
    <style:style style:name="T80" style:family="text">
      <style:text-properties officeooo:rsid="00b8ab89"/>
    </style:style>
    <style:style style:name="T81" style:family="text">
      <style:text-properties fo:color="#ff0000" loext:opacity="100%" officeooo:rsid="00b8ab89"/>
    </style:style>
    <style:style style:name="T82" style:family="text">
      <style:text-properties officeooo:rsid="00eb76da"/>
    </style:style>
    <style:style style:name="T83" style:family="text">
      <style:text-properties officeooo:rsid="00ea021a"/>
    </style:style>
    <style:style style:name="T84" style:family="text">
      <style:text-properties officeooo:rsid="00b02907"/>
    </style:style>
    <style:style style:name="T85" style:family="text">
      <style:text-properties officeooo:rsid="003df898"/>
    </style:style>
    <style:style style:name="T86" style:family="text">
      <style:text-properties officeooo:rsid="006572e5"/>
    </style:style>
    <style:style style:name="T87" style:family="text">
      <style:text-properties officeooo:rsid="005b8f16"/>
    </style:style>
    <style:style style:name="T88" style:family="text">
      <style:text-properties officeooo:rsid="00626e90"/>
    </style:style>
    <style:style style:name="T89" style:family="text">
      <style:text-properties officeooo:rsid="00637b5e"/>
    </style:style>
    <style:style style:name="T90" style:family="text">
      <style:text-properties officeooo:rsid="0069b8e7"/>
    </style:style>
    <style:style style:name="T91" style:family="text">
      <style:text-properties officeooo:rsid="007006b0"/>
    </style:style>
    <style:style style:name="T92" style:family="text">
      <style:text-properties officeooo:rsid="006c5c4b"/>
    </style:style>
    <style:style style:name="T93" style:family="text">
      <style:text-properties officeooo:rsid="006e5b79"/>
    </style:style>
    <style:style style:name="T94" style:family="text">
      <style:text-properties officeooo:rsid="00609203"/>
    </style:style>
    <style:style style:name="T95" style:family="text">
      <style:text-properties officeooo:rsid="00bca202"/>
    </style:style>
    <style:style style:name="T96" style:family="text">
      <style:text-properties officeooo:rsid="0071f41a"/>
    </style:style>
    <style:style style:name="T97" style:family="text">
      <style:text-properties officeooo:rsid="00eca002"/>
    </style:style>
    <style:style style:name="T98" style:family="text">
      <style:text-properties officeooo:rsid="00b0d232"/>
    </style:style>
    <style:style style:name="T99" style:family="text">
      <style:text-properties officeooo:rsid="00b2cb54"/>
    </style:style>
    <style:style style:name="T100" style:family="text">
      <style:text-properties officeooo:rsid="00bf8670"/>
    </style:style>
    <style:style style:name="T101" style:family="text">
      <style:text-properties officeooo:rsid="00be3284"/>
    </style:style>
    <style:style style:name="T102" style:family="text">
      <style:text-properties officeooo:rsid="00b0f13e"/>
    </style:style>
    <style:style style:name="T103" style:family="text">
      <style:text-properties officeooo:rsid="00ae3e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e word study: Transgress<text:span text:style-name="T1">* </text:span><text:span text:style-name="T2">and how it relates to sin as defined by the Bible.</text:span>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Word</text:p>
          </table:table-cell>
          <table:table-cell table:style-name="Table7.B1" office:value-type="string">
            <text:p text:style-name="P2">Number of occurrences in the Bible</text:p>
          </table:table-cell>
        </table:table-row>
        <table:table-row>
          <table:table-cell table:style-name="Table7.A2" office:value-type="string">
            <text:p text:style-name="P3">Transgress*</text:p>
          </table:table-cell>
          <table:table-cell table:style-name="Table7.B2" office:value-type="string">
            <text:p text:style-name="P3">179 times in 172 verses</text:p>
          </table:table-cell>
        </table:table-row>
        <table:table-row>
          <table:table-cell table:style-name="Table7.A2" office:value-type="string">
            <text:p text:style-name="P4">Transgress</text:p>
          </table:table-cell>
          <table:table-cell table:style-name="Table7.B2" office:value-type="string">
            <text:p text:style-name="P4">14 times in 14 verses</text:p>
          </table:table-cell>
        </table:table-row>
        <table:table-row>
          <table:table-cell table:style-name="Table7.A2" office:value-type="string">
            <text:p text:style-name="P4">Transgression</text:p>
          </table:table-cell>
          <table:table-cell table:style-name="Table7.B2" office:value-type="string">
            <text:p text:style-name="P4">51 times in 50 verses</text:p>
          </table:table-cell>
        </table:table-row>
        <table:table-row>
          <table:table-cell table:style-name="Table7.A2" office:value-type="string">
            <text:p text:style-name="P3">Transgressions</text:p>
          </table:table-cell>
          <table:table-cell table:style-name="Table7.B2" office:value-type="string">
            <text:p text:style-name="P3">48 times in 47 verses</text:p>
          </table:table-cell>
        </table:table-row>
        <table:table-row>
          <table:table-cell table:style-name="Table7.A2" office:value-type="string">
            <text:p text:style-name="P3">Transgressed</text:p>
          </table:table-cell>
          <table:table-cell table:style-name="Table7.B2" office:value-type="string">
            <text:p text:style-name="P3">34 times in 34 verses</text:p>
          </table:table-cell>
        </table:table-row>
        <table:table-row>
          <table:table-cell table:style-name="Table7.A2" office:value-type="string">
            <text:p text:style-name="P5">Transgressor</text:p>
          </table:table-cell>
          <table:table-cell table:style-name="Table7.B2" office:value-type="string">
            <text:p text:style-name="P5">5 times in 5 verses</text:p>
          </table:table-cell>
        </table:table-row>
        <table:table-row>
          <table:table-cell table:style-name="Table7.A2" office:value-type="string">
            <text:p text:style-name="P5">Transgressors</text:p>
          </table:table-cell>
          <table:table-cell table:style-name="Table7.B2" office:value-type="string">
            <text:p text:style-name="P5">20 times in 19 verses</text:p>
          </table:table-cell>
        </table:table-row>
        <table:table-row>
          <table:table-cell table:style-name="Table7.A2" office:value-type="string">
            <text:p text:style-name="P5">Transgresseth (third person singular)</text:p>
          </table:table-cell>
          <table:table-cell table:style-name="Table7.B2" office:value-type="string">
            <text:p text:style-name="P5">4 times in 4 verses</text:p>
          </table:table-cell>
        </table:table-row>
        <table:table-row>
          <table:table-cell table:style-name="Table7.A2" office:value-type="string">
            <text:p text:style-name="P6">Transgressest (second person singular)</text:p>
          </table:table-cell>
          <table:table-cell table:style-name="Table7.B2" office:value-type="string">
            <text:p text:style-name="P6">1 time in 1 verse</text:p>
          </table:table-cell>
        </table:table-row>
        <table:table-row>
          <table:table-cell table:style-name="Table7.A2" office:value-type="string">
            <text:p text:style-name="P6">Transgressing</text:p>
          </table:table-cell>
          <table:table-cell table:style-name="Table7.B2" office:value-type="string">
            <text:p text:style-name="P6">2 times in 2 verses</text:p>
          </table:table-cell>
        </table:table-row>
      </table:table>
      <text:p text:style-name="P7">(the asterisk “*” indicates <text:span text:style-name="T3">the addition of </text:span>any number of letters <text:span text:style-name="T3">that </text:span><text:span text:style-name="T4">when combined with the indicated prefix </text:span><text:span text:style-name="T3">constitute a whole word</text:span>)</text:p>
      <text:p text:style-name="P1"/>
      <text:p text:style-name="P8">The first occurrence of the word “transgress<text:span text:style-name="T5">*</text:span>” appears in <text:span text:style-name="T6">Exodus 23:21</text:span><text:span text:style-name="T7"> </text:span><text:span text:style-name="T8">(H6588, </text:span><text:span text:style-name="T9">translated elsewhere as trespass, sin, and rebellion</text:span><text:span text:style-name="T8">)</text:span>. The context is instructions given to Moses by God at Mount Sinai that Moses was to give to the children of Israel (<text:span text:style-name="T6">Exodus 20:22</text:span>).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Exodus 20:22</text:p>
            <text:p text:style-name="P10">And the LORD said unto Moses, <text:span text:style-name="T10">Thus thou shalt say unto the children of Israel, Ye have seen that I have talked with you from heaven.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Exodus 23:20-<text:span text:style-name="T11">22</text:span></text:p>
            <text:p text:style-name="P12"><text:span text:style-name="T6">20</text:span> <text:span text:style-name="T10">Behold, I send an Angel before thee, to keep thee in the way, and to bring thee into the place which I have prepared.</text:span></text:p>
            <text:p text:style-name="P13"><text:span text:style-name="T6">21</text:span> <text:span text:style-name="T10">Beware of him, and obey his voice, provoke him not; for he will not pardon your transgressions: for my name is in him.</text:span></text:p>
            <text:p text:style-name="P12"><text:span text:style-name="T6">22</text:span> <text:span text:style-name="T10">But if thou shalt indeed obey his voice, and do all that I speak; then I will be an enemy unto thine enemies, and an adversary unto thine adversaries.</text:span></text:p>
          </table:table-cell>
        </table:table-row>
      </table:table>
      <text:p text:style-name="P8"/>
      <text:p text:style-name="P14">Among other things, here we learn that a transgression is to disobey the voice of the <text:span text:style-name="T12">A</text:span>ngel <text:span text:style-name="T13">of</text:span> whom the name of the LORD is in.</text:p>
      <text:p text:style-name="P8"/>
      <text:p text:style-name="P15">Take note <text:span text:style-name="T14">that t</text:span>he word “<text:span text:style-name="T12">A</text:span>ngel” (capitalized “<text:span text:style-name="T14">a”</text:span>) appears 4 times in 4 verses in the Bible (<text:span text:style-name="T6">Genesis 48:16</text:span>, <text:span text:style-name="T6">Exodus 23:20</text:span>, <text:span text:style-name="T6">Exodus 23:23</text:span>, <text:span text:style-name="T6">Exodus 32:34</text:span>). <text:span text:style-name="T15">While the Hebrew word for angel (מֲלְאָךְ mălʼâk, </text:span><text:span text:style-name="T14">pronounced </text:span><text:span text:style-name="T15">mal-awk', </text:span><text:span text:style-name="T16">H4397</text:span><text:span text:style-name="T15">) is the same for both “Angel” and “angel”, the capital “A” clearly </text:span><text:span text:style-name="T17">conveys</text:span><text:span text:style-name="T15"> a different meaning </text:span><text:span text:style-name="T16">than the not-capitalized “angel”. </text:span><text:span text:style-name="T18">The context of the first usage of “Angel” is when Israel was blessing </text:span><text:span text:style-name="T19">Ephraim and Manasseh</text:span><text:span text:style-name="T18"> </text:span><text:span text:style-name="T20">and it appears to refer to God (</text:span><text:span text:style-name="T21">Genesis 48:1</text:span><text:span text:style-name="T22">4</text:span><text:span text:style-name="T21">-16</text:span><text:span text:style-name="T20">).</text:span></text:p>
      <text:p text:style-name="P16"><text:span text:style-name="T23"/></text:p>
      <text:p text:style-name="P17">So, if disobeying the voice of God is called a transgression, then how does it relate to <text:span text:style-name="T24">iniquity and specifically </text:span>sin which are other words used <text:span text:style-name="T25">in the Bible </text:span>to describe disobedience to God?</text:p>
      <text:p text:style-name="P17"><text:soft-page-break/></text:p>
      <text:p text:style-name="P18"><text:span text:style-name="T26">In</text:span> <text:span text:style-name="T6">Exodus 34:7</text:span>, <text:span text:style-name="T27">Joshua 24:19</text:span>, et. al. <text:span text:style-name="T26">We learn that </text:span><text:span text:style-name="T28">iniquity, </text:span><text:span text:style-name="T29">t</text:span>ransgression and sin are not exactly the same th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Exodus 34:<text:span text:style-name="T30">7</text:span></text:p>
            <text:p text:style-name="P20">Keeping mercy for thousands, forgiving <text:span text:style-name="T31">iniquity</text:span> and <text:span text:style-name="T31">transgression</text:span> and <text:span text:style-name="T31">sin</text:span>, and that will by no means clear <text:span text:style-name="T32">the guilty</text:span>; visiting the iniquity of the fathers upon the children, and upon the children's children, unto the third and to the fourth <text:span text:style-name="T32">generation</text:span>.</text:p>
          </table:table-cell>
        </table:table-row>
        <table:table-row>
          <table:table-cell table:style-name="Table1.A2" office:value-type="string">
            <text:p text:style-name="P19">Joshua 24:19</text:p>
            <text:p text:style-name="P21">And Joshua said unto the people, Ye cannot serve the LORD: for he <text:span text:style-name="T32">is</text:span> an holy God; he <text:span text:style-name="T32">is</text:span> a jealous God; he will not forgive your <text:span text:style-name="T31">transgressions</text:span> <text:span text:style-name="T31">nor</text:span> your <text:span text:style-name="T31">sins</text:span>.</text:p>
          </table:table-cell>
        </table:table-row>
        <table:table-row>
          <table:table-cell table:style-name="Table1.A3" office:value-type="string">
            <text:p text:style-name="P22">Isaiah 44:22</text:p>
            <text:p text:style-name="P23">I have blotted out, as a thick cloud, thy transgressions, and, as a cloud, thy sins: return unto me; for I have redeemed thee.</text:p>
          </table:table-cell>
        </table:table-row>
      </table:table>
      <text:p text:style-name="P18"/>
      <text:p text:style-name="P24">In <text:span text:style-name="T6">Leviticus </text:span><text:span text:style-name="T33">16:16, </text:span><text:span text:style-name="T6">16:21</text:span> we learn that transgression <text:span text:style-name="T34">and sin are very closely tied together </text:span><text:span text:style-name="T35">(specifically, a transgression is a type of sin, </text:span><text:span text:style-name="T36">and thus a transgression is always sin</text:span><text:span text:style-name="T35">)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Leviticus 16:16</text:p>
            <text:p text:style-name="P26">And he shall make an atonement for the holy <text:span text:style-name="T32">place</text:span>, because of the uncleanness of the children of Israel, and because of their transgressions <text:span text:style-name="T31">in all</text:span> their sins: and so shall he do for the tabernacle of the congregation, that remaineth among them in the midst of their uncleanness.</text:p>
          </table:table-cell>
        </table:table-row>
        <table:table-row>
          <table:table-cell table:style-name="Table2.A2" office:value-type="string">
            <text:p text:style-name="P27">Leviticus 16:21</text:p>
            <text:p text:style-name="P28">And Aaron shall lay both his hands upon the head of the live goat, and confess over him all the <text:span text:style-name="T37">iniquities</text:span> of the children of Israel, and all their transgressions <text:span text:style-name="T31">in all</text:span> their sins, putting them upon the head of the goat, and shall send <text:span text:style-name="T32">him</text:span> away by the hand of a fit man into the wilderness:</text:p>
          </table:table-cell>
        </table:table-row>
      </table:table>
      <text:p text:style-name="P24"/>
      <text:p text:style-name="P29"><text:span text:style-name="T38">T</text:span>he first occurrence of the word sin <text:span text:style-name="T38">is i</text:span>n <text:span text:style-name="T6">Genesis 4:7</text:span> <text:span text:style-name="T38">where </text:span>we learn that sin is the opposite of doing well (which is <text:span text:style-name="T39">also </text:span>acceptable <text:span text:style-name="T40">to God</text:span>). <text:span text:style-name="T41">T</text:span>herefore, sin <text:span text:style-name="T40">can be roughly</text:span> <text:span text:style-name="T40">defined as “behavior that is not acceptable to God.</text:span>”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Genesis 4:7</text:p>
            <text:p text:style-name="P31">If thou doest well, shalt thou not be accepted? and if thou doest not well, sin lieth at the door. And unto thee <text:span text:style-name="T32">shall be</text:span> his desire, and thou shalt rule over him.</text:p>
          </table:table-cell>
        </table:table-row>
      </table:table>
      <text:p text:style-name="P32"/>
      <text:p text:style-name="P33"><text:span text:style-name="T6">I John 3:4</text:span> <text:span text:style-name="T42">reveals more about the</text:span><text:span text:style-name="T43"> relationship </text:span><text:span text:style-name="T44">between sin and transgression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>1 John 3:4</text:p>
            <text:p text:style-name="P35">Whosoever committeth sin transgresseth also the law: for sin is the transgression of the law.</text:p>
          </table:table-cell>
        </table:table-row>
      </table:table>
      <text:p text:style-name="P36"/>
      <text:p text:style-name="P37">We need to dig a little deeper to better understand how transgression and sin are not exactly the same. To do so, lets do a <text:span text:style-name="T45">case study from the Bible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><text:soft-page-break/><text:span text:style-name="T46">The context is</text:span><text:span text:style-name="T47"> Joshua, </text:span><text:span text:style-name="T48">the children of </text:span><text:span text:style-name="T49">Israel, </text:span><text:span text:style-name="T50">and </text:span><text:span text:style-name="T51">the events at </text:span><text:span text:style-name="T47">Jericho and Ai.</text:span></text:p>
      <text:p text:style-name="P37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1 Chronicles 2:7</text:p>
            <text:p text:style-name="P40">And the sons of Carmi; Achar, <text:span text:style-name="T31">the troubler</text:span> of Israel, who <text:span text:style-name="T31">transgressed in the thing accursed</text:span>.</text:p>
          </table:table-cell>
        </table:table-row>
      </table:table>
      <text:p text:style-name="P41"/>
      <text:p text:style-name="P42">In Joshua chapter 7 we learn that Israel is defeated at Ai becaus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3">Joshua 7:<text:span text:style-name="T52">1</text:span></text:p>
            <text:p text:style-name="P44">But the children of Israel <text:span text:style-name="T31">committed a trespass in the accursed thing</text:span>: for Achan, the son of Carmi, the son of Zabdi, the son of Zerah, of the tribe of Judah, <text:span text:style-name="T31">took of the accursed thing</text:span>: and the anger of the LORD was kindled against the children of Israel.</text:p>
          </table:table-cell>
        </table:table-row>
        <table:table-row>
          <table:table-cell table:style-name="Table11.A2" office:value-type="string">
            <text:p text:style-name="P45">Joshua 7:11</text:p>
            <text:p text:style-name="P46">Israel hath <text:span text:style-name="T31">sinned</text:span>, and they have <text:span text:style-name="T31">also transgressed my covenant</text:span> which I commanded them: for they have even <text:span text:style-name="T31">taken of the accursed thing</text:span>, and have also <text:span text:style-name="T31">stolen</text:span>, <text:span text:style-name="T31">and dissembled</text:span> also, and they have <text:span text:style-name="T31">put </text:span><text:span text:style-name="T53">it</text:span><text:span text:style-name="T31"> even among their own stuff</text:span>.</text:p>
          </table:table-cell>
        </table:table-row>
      </table:table>
      <text:p text:style-name="P47">The covenant is detailed in <text:span text:style-name="T6">Exodus 20:1-23:33</text:span><text:span text:style-name="T7">.</text:span></text:p>
      <text:p text:style-name="P48"/>
      <text:p text:style-name="P49"><text:span text:style-name="T54">Note: dissembled </text:span><text:span text:style-name="T55">here </text:span><text:span text:style-name="T54">does not mean to “take apart” or “break into constituent pieces” </text:span><text:span text:style-name="T56">as we might expect </text:span><text:span text:style-name="T57">(dis</text:span><text:span text:style-name="T58">as</text:span><text:span text:style-name="T57">sembled)</text:span><text:span text:style-name="T56">. </text:span><text:span text:style-name="T59">It occurs 3 times in 3 verses (</text:span><text:span text:style-name="T60">Joshua 7:11</text:span><text:span text:style-name="T59">, </text:span><text:span text:style-name="T60">Jeremiah 42:20</text:span><text:span text:style-name="T59">, </text:span><text:span text:style-name="T60">Galatians 2:13</text:span><text:span text:style-name="T59">) </text:span><text:span text:style-name="T61">and </text:span><text:span text:style-name="T59">the biblical usage appears to agree with </text:span><text:span text:style-name="T54">Noah Websters 1828 </text:span><text:span text:style-name="T59">dictionary definition</text:span><text:span text:style-name="T54">:</text:span></text:p>
      <text:p text:style-name="P49"><text:span text:style-name="T54"/></text:p>
      <text:p text:style-name="P50"><text:a xlink:type="simple" xlink:href="https://webstersdictionary1828.com/Dictionary/dissembled" text:style-name="Internet_20_link" text:visited-style-name="Visited_20_Internet_20_Link"><text:span text:style-name="T62">https://webstersdictionary1828.com/Dictionary/dissembled</text:span></text:a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1">DISSEMBLED, participle passive</text:p>
            <text:p text:style-name="P51">Concealed under a false appearance; disguised.</text:p>
          </table:table-cell>
        </table:table-row>
      </table:table>
      <text:p text:style-name="P52"/>
      <text:p text:style-name="P52">In <text:span text:style-name="T6">Joshua 1:18</text:span> we learn that <text:span text:style-name="T63">the officers of the people (v</text:span><text:span text:style-name="T64">10</text:span><text:span text:style-name="T63">,</text:span><text:span text:style-name="T64">16</text:span><text:span text:style-name="T63">) agreed that </text:span><text:span text:style-name="T65">anyone that rebels against the commandment of Joshua shall be put to death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3">Joshua 1:18</text:p>
            <text:p text:style-name="P54">Whosoever <text:span text:style-name="T32">he be</text:span> that doth rebel against thy commandment, and will not hearken unto thy words in all that thou commandest him, he shall be put to death: only be strong and of a good courage.</text:p>
          </table:table-cell>
        </table:table-row>
      </table:table>
      <text:p text:style-name="P55"/>
      <text:p text:style-name="P55">Joshua’s command regarding Jericho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6">Joshua 6:17-19</text:p>
            <text:p text:style-name="P57"><text:span text:style-name="T6">17</text:span> And the city shall be <text:span text:style-name="T31">accursed</text:span>, even it, and <text:span text:style-name="T31">all that are therein</text:span>, to the LORD: only Rahab the harlot shall live, she and all that are with her in the house, because she hid the messengers that we sent.</text:p>
            <text:p text:style-name="P57"><text:span text:style-name="T6">18</text:span> And ye, in any wise <text:span text:style-name="T31">keep yourselves from the accursed thing</text:span>, lest ye make yourselves accursed, when ye take of the accursed thing, and make the camp of Israel a curse, and <text:span text:style-name="T31">trouble it</text:span>.</text:p>
            <text:p text:style-name="P57"><text:span text:style-name="T6">19</text:span> But all the silver, and gold, and vessels of brass and iron, are consecrated unto the LORD: they shall come into the treasury of the LORD.</text:p>
          </table:table-cell>
        </table:table-row>
      </table:table>
      <text:p text:style-name="P58"/>
      <text:list text:style-name="L1">
        <text:list-item>
          <text:p text:style-name="P59">The city and <text:span text:style-name="T66">all that are therein</text:span> are <text:span text:style-name="T66">ac</text:span>cursed <text:span text:style-name="T67">to the LORD</text:span><text:span text:style-name="T66"> </text:span>excepting Rahab and all in her house.</text:p>
        </text:list-item>
        <text:list-item>
          <text:p text:style-name="P60">The silver, gold, and vessels of brass and iron are consecrated <text:span text:style-name="T12">unto the LORD</text:span>.</text:p>
        </text:list-item>
      </text:list>
      <text:p text:style-name="P61"><text:soft-page-break/>Achan’s confession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Joshua 7:19-22</text:p>
            <text:p text:style-name="P63"><text:span text:style-name="T6">19</text:span> And Joshua said unto Achan, My son, give, I pray thee, glory to the LORD God of Israel, and make confession unto him; and tell me now what thou hast done; hide it not from me.</text:p>
            <text:p text:style-name="P64"><text:span text:style-name="T68">20</text:span><text:span text:style-name="T69"> And Achan answered Joshua, and said, Indeed </text:span><text:span text:style-name="T70">I have sinned against the LORD God of Israel</text:span><text:span text:style-name="T69">, and thus and thus have I done:</text:span></text:p>
            <text:p text:style-name="P64"><text:span text:style-name="T68">21</text:span><text:span text:style-name="T69"> When I saw among the spoils a goodly Babylonish </text:span><text:span text:style-name="T70">garment</text:span><text:span text:style-name="T69">, and </text:span><text:span text:style-name="T71">two hundred shekels of </text:span><text:span text:style-name="T70">silver</text:span><text:span text:style-name="T69">, and a wedge of </text:span><text:span text:style-name="T70">gold</text:span><text:span text:style-name="T69"> of fifty shekels weight, then </text:span><text:span text:style-name="T70">I coveted them</text:span><text:span text:style-name="T69">, and </text:span><text:span text:style-name="T70">took them</text:span><text:span text:style-name="T69">; and, behold, </text:span><text:span text:style-name="T70">they are hid</text:span><text:span text:style-name="T69"> in the earth in the midst of my tent, and the silver under it.</text:span></text:p>
            <text:p text:style-name="P64"><text:span text:style-name="T68">22</text:span><text:span text:style-name="T69"> So Joshua sent messengers, and they ran unto the tent; and, behold, it was hid in his tent, and the silver under it.</text:span></text:p>
          </table:table-cell>
        </table:table-row>
      </table:table>
      <text:p text:style-name="P61"/>
      <text:list text:style-name="L2">
        <text:list-item>
          <text:p text:style-name="P65">Achan disobeyed Joshua’s command.</text:p>
          <text:list>
            <text:list-item>
              <text:p text:style-name="P65">By taking of the accursed thing (the garment)</text:p>
            </text:list-item>
            <text:list-item>
              <text:p text:style-name="P65">By stealing items consecrated to the LORD <text:span text:style-name="T72">(silver and gold)</text:span></text:p>
            </text:list-item>
          </text:list>
        </text:list-item>
        <text:list-item>
          <text:p text:style-name="P66">Achan transgressed God’s covenant.</text:p>
          <text:list>
            <text:list-item>
              <text:p text:style-name="P66">By <text:span text:style-name="T73">c</text:span>oveting <text:span text:style-name="T72">(</text:span><text:span text:style-name="T74">10</text:span><text:span text:style-name="T75">th</text:span><text:span text:style-name="T74"> commandment, </text:span><text:span text:style-name="T72">inordinate desire)</text:span></text:p>
            </text:list-item>
            <text:list-item>
              <text:p text:style-name="P67">By stealing (<text:span text:style-name="T74">8</text:span><text:span text:style-name="T75">th</text:span><text:span text:style-name="T74"> commandment, </text:span>taking what was not rightfully his)</text:p>
            </text:list-item>
            <text:list-item>
              <text:p text:style-name="P68"><text:span text:style-name="T76">P</text:span>lacing his opinion <text:span text:style-name="T77">above God’s </text:span><text:span text:style-name="T76">(1</text:span><text:span text:style-name="T78">st</text:span><text:span text:style-name="T76"> commandment, making himself god)</text:span></text:p>
            </text:list-item>
            <text:list-item>
              <text:p text:style-name="P68"><text:span text:style-name="T76">Placing his desire for material possessions above his desire for God (2</text:span><text:span text:style-name="T78">nd</text:span><text:span text:style-name="T76"> commandment, </text:span><text:span text:style-name="T79">idolatry).</text:span></text:p>
            </text:list-item>
          </text:list>
        </text:list-item>
        <text:list-item>
          <text:p text:style-name="P69">Achan sinned against God <text:span text:style-name="T80">and thus “</text:span><text:span text:style-name="T81">Israel hath sinned.</text:span><text:span text:style-name="T80">”</text:span></text:p>
          <text:list>
            <text:list-item>
              <text:p text:style-name="P70">Behaving in a way that was unacceptable to God.</text:p>
            </text:list-item>
          </text:list>
        </text:list-item>
      </text:list>
      <text:p text:style-name="P71"/>
      <text:p text:style-name="P72"/>
      <text:p text:style-name="P72">So, putting it all together we can conclude:</text:p>
      <text:p text:style-name="P73"/>
      <text:p text:style-name="P73">Sin is unacceptable behavior before God and to transgress <text:span text:style-name="T82">describes</text:span><text:span text:style-name="T83"> the action </text:span>of “crossing over” the boundaries set by God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/>
      <text:p text:style-name="P76">Extra</text:p>
      <text:p text:style-name="P77"/>
      <text:p text:style-name="P77"><text:span text:style-name="T84">Let’s take a</text:span> moment and look at the word transgression itself and think about it’s constituent parts <text:span text:style-name="T85">and </text:span>things that come to mind from each of them:</text:p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8">trans</text:p>
          </table:table-cell>
          <table:table-cell table:style-name="Table3.B1" office:value-type="string">
            <text:p text:style-name="P78">gression</text:p>
          </table:table-cell>
        </table:table-row>
        <table:table-row>
          <table:table-cell table:style-name="Table3.A2" office:value-type="string">
            <text:p text:style-name="P79">Moving across a border</text:p>
            <text:p text:style-name="P79">(transcontinental)</text:p>
          </table:table-cell>
          <table:table-cell table:style-name="Table3.B2" office:value-type="string">
            <text:p text:style-name="P80">Aggression </text:p>
            <text:p text:style-name="P80"><text:span text:style-name="T86">(</text:span><text:span text:style-name="T87">the opposite of meek</text:span><text:span text:style-name="T84">ness</text:span><text:span text:style-name="T87">)</text:span></text:p>
          </table:table-cell>
        </table:table-row>
        <table:table-row>
          <table:table-cell table:style-name="Table3.A2" office:value-type="string">
            <text:p text:style-name="P79">Moving from one place to another</text:p>
            <text:p text:style-name="P79">(transport)</text:p>
          </table:table-cell>
          <table:table-cell table:style-name="Table3.B2" office:value-type="string">
            <text:p text:style-name="P81">Digression</text:p>
            <text:p text:style-name="P81"><text:span text:style-name="T88">(deviation, straying, </text:span><text:span text:style-name="T89">deviation from a regular course</text:span><text:span text:style-name="T88">)</text:span></text:p>
          </table:table-cell>
        </table:table-row>
        <table:table-row>
          <table:table-cell table:style-name="Table3.A2" office:value-type="string">
            <text:p text:style-name="P82">Transfer from one place to another</text:p>
            <text:p text:style-name="P82">(transmit)</text:p>
          </table:table-cell>
          <table:table-cell table:style-name="Table3.B2" office:value-type="string">
            <text:p text:style-name="P81">Regression</text:p>
            <text:p text:style-name="P81"><text:span text:style-name="T88">(reversion, </text:span><text:span text:style-name="T89">passing back or returning, turning your back to </text:span><text:span text:style-name="T90">something and going the other way</text:span><text:span text:style-name="T88">)</text:span></text:p>
          </table:table-cell>
        </table:table-row>
      </table:table>
      <text:p text:style-name="P83"/>
      <text:p text:style-name="P83">As a <text:span text:style-name="T91">conceptual </text:span>analogue, <text:span text:style-name="T92">lets have a</text:span> look at the formula for work<text:span text:style-name="T93"> </text:span><text:span text:style-name="T94">and substitute </text:span><text:span text:style-name="T95">(or, “Plug and chug” as a friend used to say)</text:span><text:span text:style-name="T94">:</text:span></text:p>
      <text:p text:style-name="P8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4">work = distance x force</text:p>
          </table:table-cell>
        </table:table-row>
        <table:table-row>
          <table:table-cell table:style-name="Table10.A2" office:value-type="string">
            <text:p text:style-name="P84">transgression = <text:span text:style-name="T94">trans x gression</text:span></text:p>
          </table:table-cell>
        </table:table-row>
        <table:table-row>
          <table:table-cell table:style-name="Table10.A2" office:value-type="string">
            <text:p text:style-name="P85"><text:span text:style-name="T96">t</text:span>ransgression = (<text:span text:style-name="T97">moving</text:span><text:span text:style-name="T96"> </text:span>past an acceptable point) x (aggressively, <text:span text:style-name="T98">forcefully</text:span>)</text:p>
          </table:table-cell>
        </table:table-row>
      </table:table>
      <text:p text:style-name="P77"/>
      <text:p text:style-name="P86">From the word itself, we can learn <text:span text:style-name="T99">quite a bit </text:span><text:span text:style-name="T100">as you can see</text:span><text:span text:style-name="T99">. If we take what we learned earl</text:span><text:span text:style-name="T101">ier</text:span><text:span text:style-name="T99"> from the Bible we can see </text:span>that transgression is “aggressively/<text:span text:style-name="T102">forcefully</text:span> crossing over <text:span text:style-name="T102">an acceptable boundary </text:span><text:span text:style-name="T99">set by God.</text:span>”</text:p>
      <text:p text:style-name="P86"/>
      <text:p text:style-name="P86"/>
      <text:p text:style-name="P86"/>
      <text:p text:style-name="P87"><text:a xlink:type="simple" xlink:href="https://webstersdictionary1828.com/Dictionary/transgress" text:style-name="Internet_20_link" text:visited-style-name="Visited_20_Internet_20_Link">https://webstersdictionary1828.com/Dictionary/transgress</text:a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8">TRANSGRESS', verb transitive [Latin transgressus, transgredior; trans and gradior, to pass.]</text:p>
            <text:p text:style-name="P88"/>
            <text:p text:style-name="P88">1. To pass over or beyond any limit; to surpass.</text:p>
            <text:p text:style-name="P88"/>
            <text:p text:style-name="P88">2. In a moral sense, to overpass any rule prescribed as the limit of duty; to break or violate a law, civil or moral. To transgress a divine law, is sin.</text:p>
            <text:p text:style-name="P88"/>
            <text:p text:style-name="P88">TRANSGRESS', verb intransitive To offend by violating a law; to sin.</text:p>
            <text:p text:style-name="P88"/>
            <text:p text:style-name="P88"><text:span text:style-name="T103">I </text:span>Chron 2.</text:p>
          </table:table-cell>
        </table:table-row>
      </table:table>
      <text:p text:style-name="P89"/>
      <text:p text:style-name="P90"/>
      <text:p text:style-name="P90"/>
      <text:p text:style-name="P91">The first occurrence of transgress*, Strongs definition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8">Strongs: H6588 - pesha` - peh'-shah from 6586; a revolt (national, moral or religious):--rebellion, sin, transgression, trespass. see HEBREW for 06586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2-14T09:04:10.694000000</meta:creation-date>
    <dc:date>2026-07-11T12:20:41.616871420</dc:date>
    <meta:editing-duration>PT5H42M10S</meta:editing-duration>
    <meta:editing-cycles>223</meta:editing-cycles>
    <meta:generator>LibreOffice/26.2.4.2$Linux_X86_64 LibreOffice_project/64a984c51f4702dbd3710b13428c673a2f1292e7</meta:generator>
    <meta:document-statistic meta:table-count="17" meta:image-count="0" meta:object-count="0" meta:page-count="5" meta:paragraph-count="123" meta:word-count="1734" meta:character-count="9845" meta:non-whitespace-character-count="8246"/>
  </office:meta>
</office:document-meta>
</file>