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briela" svg:font-family="Gabriela, sans-serif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972in" table:align="left"/>
    </style:style>
    <style:style style:name="Table1.A" style:family="table-column">
      <style:table-column-properties style:column-width="0.8333in"/>
    </style:style>
    <style:style style:name="Table1.B" style:family="table-column">
      <style:table-column-properties style:column-width="7.0639in"/>
    </style:style>
    <style:style style:name="Table1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1.B1" style:family="table-cell">
      <style:table-cell-properties style:vertical-align="middle" fo:padding="0.0313in" fo:border="0.75pt solid #000000"/>
    </style:style>
    <style:style style:name="Table1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1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4" style:family="table">
      <style:table-properties style:width="7.9in" table:align="center"/>
    </style:style>
    <style:style style:name="Table4.A" style:family="table-column">
      <style:table-column-properties style:column-width="6.9535in"/>
    </style:style>
    <style:style style:name="Table4.B" style:family="table-column">
      <style:table-column-properties style:column-width="0.9465in"/>
    </style:style>
    <style:style style:name="Table4.A1" style:family="table-cell">
      <style:table-cell-properties style:vertical-align="middle" fo:padding="0.0313in" fo:border="0.75pt solid #000000"/>
    </style:style>
    <style:style style:name="Table4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4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fo:font-variant="normal" fo:text-transform="none" fo:color="#127630" loext:opacity="100%" style:font-name="Liberation Sans" fo:font-size="12pt" fo:font-style="normal" fo:font-weight="normal" style:font-size-asian="12pt" style:font-size-complex="12pt"/>
    </style:style>
    <style:style style:name="P2" style:family="paragraph" style:parent-style-name="Table_20_Contents">
      <style:paragraph-properties fo:margin-left="0in" fo:margin-right="0in" fo:margin-top="0in" fo:margin-bottom="0in" style:contextual-spacing="false" style:line-height-at-least="0.2398in" fo:text-indent="0in" style:auto-text-indent="false"/>
      <style:text-properties fo:font-variant="normal" fo:text-transform="none" fo:color="#8e3d21" loext:opacity="100%" style:font-name="Liberation Sans" fo:font-size="12pt" fo:font-style="normal" fo:font-weight="normal" style:font-size-asian="12pt" style:font-size-complex="12p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style:line-height-at-least="0.2398in" fo:text-indent="0in" style:auto-text-indent="false"/>
      <style:text-properties fo:font-variant="normal" fo:text-transform="none" style:font-name="Liberation Sans" fo:font-size="12pt" fo:font-style="normal" fo:font-weight="normal" style:font-size-asian="12pt" style:font-size-complex="12pt"/>
    </style:style>
    <style:style style:name="P4" style:family="paragraph" style:parent-style-name="Standard">
      <style:paragraph-properties fo:margin-top="0in" fo:margin-bottom="0.1965in" style:contextual-spacing="false"/>
      <style:text-properties fo:color="#660000" loext:opacity="100%" style:font-name="Liberation Sans" fo:font-size="12pt" style:font-size-asian="12pt" style:font-name-complex="Liberation Sans" style:font-size-complex="12pt"/>
    </style:style>
    <style:style style:name="P5" style:family="paragraph" style:parent-style-name="Text_20_body">
      <style:paragraph-properties fo:orphans="0" fo:widows="0"/>
      <style:text-properties style:font-name="Liberation Sans" fo:font-size="14pt" style:font-size-asian="14pt" style:font-name-complex="Liberation Sans" style:font-size-complex="14pt"/>
    </style:style>
    <style:style style:name="P6" style:family="paragraph" style:parent-style-name="Text_20_body">
      <style:paragraph-properties fo:orphans="0" fo:widows="0"/>
    </style:style>
    <style:style style:name="P7" style:family="paragraph" style:parent-style-name="Horizontal_20_Line">
      <style:paragraph-properties fo:orphans="0" fo:widows="0"/>
      <style:text-properties style:font-name="Liberation Sans" fo:font-size="12pt" style:font-size-asian="12pt" style:font-name-complex="Liberation Sans" style:font-size-complex="12pt"/>
    </style:style>
    <style:style style:name="P8" style:family="paragraph" style:parent-style-name="Text_20_body">
      <style:paragraph-properties fo:margin-left="0in" fo:margin-right="0in" fo:orphans="0" fo:widows="0" fo:text-indent="0in" style:auto-text-indent="false"/>
    </style:style>
    <style:style style:name="P9" style:family="paragraph" style:parent-style-name="Horizontal_20_Line">
      <style:paragraph-properties fo:orphans="0" fo:widows="0"/>
      <style:text-properties style:font-name="Liberation Sans" fo:font-size="12pt" officeooo:paragraph-rsid="00193e34" style:font-size-asian="12pt" style:font-name-complex="Liberation Sans" style:font-size-complex="12pt"/>
    </style:style>
    <style:style style:name="P10" style:family="paragraph" style:parent-style-name="Text_20_body">
      <style:paragraph-properties fo:margin-left="0in" fo:margin-right="0in" fo:orphans="0" fo:widows="0" fo:text-indent="0in" style:auto-text-indent="false"/>
      <style:text-properties style:font-name="Liberation Sans" fo:font-size="12pt" officeooo:rsid="00193e34" officeooo:paragraph-rsid="00193e34" style:font-size-asian="12pt" style:font-name-complex="Liberation Sans" style:font-size-complex="12pt"/>
    </style:style>
    <style:style style:name="P11" style:family="paragraph" style:parent-style-name="Table_20_Contents">
      <style:text-properties style:font-name="Liberation Sans" fo:font-size="12pt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217fb7" officeooo:paragraph-rsid="00217fb7" style:font-size-asian="12pt" style:font-size-complex="12pt"/>
    </style:style>
    <style:style style:name="P13" style:family="paragraph" style:parent-style-name="Table_20_Contents">
      <style:text-properties officeooo:rsid="00205859" officeooo:paragraph-rsid="00205859"/>
    </style:style>
    <style:style style:name="P14" style:family="paragraph" style:parent-style-name="Table_20_Contents">
      <style:text-properties officeooo:rsid="0020a1c8" officeooo:paragraph-rsid="0020a1c8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style:font-name="Gabriela" fo:font-size="15pt" fo:font-style="normal" fo:font-weight="normal" officeooo:rsid="001d810e" officeooo:paragraph-rsid="001d810e"/>
    </style:style>
    <style:style style:name="P16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style:font-name="Gabriela" fo:font-size="15pt" fo:font-style="normal" fo:font-weight="normal"/>
    </style:style>
    <style:style style:name="P17" style:family="paragraph" style:parent-style-name="Table_20_Contents">
      <style:paragraph-properties fo:margin-left="0in" fo:margin-right="0in" fo:text-align="right" style:justify-single-word="false" fo:text-indent="0in" style:auto-text-indent="false"/>
      <style:text-properties fo:font-variant="normal" fo:text-transform="none" style:font-name="Gabriela" fo:font-size="15pt" fo:font-style="normal" fo:font-weight="normal"/>
    </style:style>
    <style:style style:name="P18" style:family="paragraph" style:parent-style-name="Table_20_Contents">
      <style:paragraph-properties fo:margin-left="0in" fo:margin-right="0in" fo:text-align="left" style:justify-single-word="false" fo:text-indent="0in" style:auto-text-indent="false"/>
      <style:text-properties fo:font-variant="normal" fo:text-transform="none" fo:color="#8e3d21" loext:opacity="100%" style:font-name="Gabriela" fo:font-size="15pt" fo:font-style="normal" fo:font-weight="normal"/>
    </style:style>
    <style:style style:name="P19" style:family="paragraph" style:parent-style-name="Table_20_Contents">
      <style:paragraph-properties fo:text-align="right" style:justify-single-word="false"/>
      <style:text-properties fo:font-variant="normal" fo:text-transform="none" style:font-name="Gabriela" fo:font-size="15pt" fo:font-style="normal" fo:font-weight="normal"/>
    </style:style>
    <style:style style:name="T1" style:family="text">
      <style:text-properties fo:background-color="#fffb00" loext:char-shading-value="0" loext:padding="0.0193in" loext:border="0.74pt solid #d8c79d"/>
    </style:style>
    <style:style style:name="T2" style:family="text">
      <style:text-properties style:text-position="super 58%" fo:background-color="#fffb00" loext:char-shading-value="0" loext:padding="0.0193in" loext:border="0.74pt solid #d8c79d"/>
    </style:style>
    <style:style style:name="T3" style:family="text">
      <style:text-properties fo:color="#676c8a" loext:opacity="100%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color="#a52a2a" loext:opacity="100%" fo:font-weight="bold"/>
    </style:style>
    <style:style style:name="T6" style:family="text">
      <style:text-properties style:font-name="Liberation Sans" fo:font-size="12pt" fo:font-weight="bold" style:font-size-asian="12pt" style:font-name-complex="Liberation Sans" style:font-size-complex="12pt"/>
    </style:style>
    <style:style style:name="T7" style:family="text">
      <style:text-properties style:font-name="Liberation Sans" fo:font-size="12pt" style:font-size-asian="12pt" style:font-name-complex="Liberation Sans" style:font-size-complex="12pt"/>
    </style:style>
    <style:style style:name="T8" style:family="text">
      <style:text-properties style:font-name="Liberation Sans" fo:font-size="12pt" officeooo:rsid="0010c79b" style:font-size-asian="12pt" style:font-name-complex="Liberation Sans" style:font-size-complex="12pt"/>
    </style:style>
    <style:style style:name="T9" style:family="text">
      <style:text-properties style:font-name="Liberation Sans" fo:font-size="12pt" fo:font-style="italic" style:font-size-asian="12pt" style:font-name-complex="Liberation Sans" style:font-size-complex="12pt"/>
    </style:style>
    <style:style style:name="T10" style:family="text">
      <style:text-properties fo:color="#a52a2a" loext:opacity="100%" style:font-name="Liberation Sans" fo:font-size="12pt" style:font-size-asian="12pt" style:font-name-complex="Liberation Sans" style:font-size-complex="12pt"/>
    </style:style>
    <style:style style:name="T11" style:family="text">
      <style:text-properties fo:color="#a52a2a" loext:opacity="100%" style:font-name="Liberation Sans" fo:font-size="12pt" officeooo:rsid="0010f537" style:font-size-asian="12pt" style:font-name-complex="Liberation Sans" style:font-size-complex="12pt"/>
    </style:style>
    <style:style style:name="T12" style:family="text">
      <style:text-properties fo:color="#a52a2a" loext:opacity="100%" style:font-name="Liberation Sans" fo:font-size="12pt" officeooo:rsid="0016b9ab" style:font-size-asian="12pt" style:font-name-complex="Liberation Sans" style:font-size-complex="12pt"/>
    </style:style>
    <style:style style:name="T13" style:family="text">
      <style:text-properties fo:color="#a52a2a" loext:opacity="100%" style:font-name="Liberation Sans" fo:font-size="12pt" officeooo:rsid="0012c8ff" style:font-size-asian="12pt" style:font-name-complex="Liberation Sans" style:font-size-complex="12pt"/>
    </style:style>
    <style:style style:name="T14" style:family="text">
      <style:text-properties fo:color="#a52a2a" loext:opacity="100%" style:font-name="Liberation Sans" fo:font-size="12pt" officeooo:rsid="00147d24" style:font-size-asian="12pt" style:font-name-complex="Liberation Sans" style:font-size-complex="12pt"/>
    </style:style>
    <style:style style:name="T15" style:family="text">
      <style:text-properties fo:color="#a52a2a" loext:opacity="100%" style:font-name="Liberation Sans" fo:font-size="12pt" officeooo:rsid="0015811b" style:font-size-asian="12pt" style:font-name-complex="Liberation Sans" style:font-size-complex="12pt"/>
    </style:style>
    <style:style style:name="T16" style:family="text">
      <style:text-properties fo:color="#660000" loext:opacity="100%" style:font-name="Liberation Sans" fo:font-size="12pt" fo:font-weight="bold" style:font-size-asian="12pt" style:font-name-complex="Liberation Sans" style:font-size-complex="12pt"/>
    </style:style>
    <style:style style:name="T17" style:family="text">
      <style:text-properties officeooo:rsid="001da3ed"/>
    </style:style>
    <style:style style:name="T18" style:family="text">
      <style:text-properties fo:background-color="#fff5c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at 2:11</text:p>
          </table:table-cell>
          <table:table-cell table:style-name="Table1.B1" office:value-type="string">
            <text:p text:style-name="P2">And when they were come into the house, they saw the young child with Mary his mother, and fell down, and worshipped him: and when they had opened their <text:span text:style-name="T1">treasures</text:span><text:span text:style-name="T2">G2344</text:span>, they presented unto him gifts; gold, and frankincense, and myrrh.</text:p>
          </table:table-cell>
        </table:table-row>
        <table:table-row>
          <table:table-cell table:style-name="Table1.A2" office:value-type="string">
            <text:p text:style-name="P1">Mat 6:19</text:p>
          </table:table-cell>
          <table:table-cell table:style-name="Table1.B2" office:value-type="string">
            <text:p text:style-name="P2">Lay not up for yourselves <text:span text:style-name="T1">treasures</text:span><text:span text:style-name="T2">G2344</text:span> upon earth, where moth and rust doth corrupt, and where thieves break through and steal:</text:p>
          </table:table-cell>
        </table:table-row>
        <table:table-row>
          <table:table-cell table:style-name="Table1.A2" office:value-type="string">
            <text:p text:style-name="P1">Mat 6:20</text:p>
          </table:table-cell>
          <table:table-cell table:style-name="Table1.B2" office:value-type="string">
            <text:p text:style-name="P2">But lay up for yourselves <text:span text:style-name="T1">treasures</text:span><text:span text:style-name="T2">G2344</text:span> in heaven, where neither moth nor rust doth corrupt, and where thieves do not break through nor steal:</text:p>
          </table:table-cell>
        </table:table-row>
        <table:table-row>
          <table:table-cell table:style-name="Table1.A2" office:value-type="string">
            <text:p text:style-name="P1">Mat 6:21</text:p>
          </table:table-cell>
          <table:table-cell table:style-name="Table1.B2" office:value-type="string">
            <text:p text:style-name="P3">For where your <text:span text:style-name="T1">treasure</text:span><text:span text:style-name="T2">G2344</text:span> is, there will your heart be also.</text:p>
          </table:table-cell>
        </table:table-row>
        <table:table-row>
          <table:table-cell table:style-name="Table1.A2" office:value-type="string">
            <text:p text:style-name="P1">Mat 12:35</text:p>
          </table:table-cell>
          <table:table-cell table:style-name="Table1.B2" office:value-type="string">
            <text:p text:style-name="P3">A good man out of the good <text:span text:style-name="T1">treasure</text:span><text:span text:style-name="T2">G2344</text:span> of the heart bringeth forth good things: and an evil man out of the evil <text:span text:style-name="T1">treasure</text:span><text:span text:style-name="T2">G2344</text:span> bringeth forth evil things.</text:p>
          </table:table-cell>
        </table:table-row>
        <table:table-row>
          <table:table-cell table:style-name="Table1.A2" office:value-type="string">
            <text:p text:style-name="P1">Mat 13:44</text:p>
          </table:table-cell>
          <table:table-cell table:style-name="Table1.B2" office:value-type="string">
            <text:p text:style-name="P3">Again, the kingdom of heaven is like <text:span text:style-name="T1">unto treasure</text:span><text:span text:style-name="T2">G2344</text:span> hid in a field; the which when a man hath found, he hideth, and for joy thereof goeth and selleth all that he hath, and buyeth that field.</text:p>
          </table:table-cell>
        </table:table-row>
        <table:table-row>
          <table:table-cell table:style-name="Table1.A2" office:value-type="string">
            <text:p text:style-name="P1">Mat 13:52</text:p>
          </table:table-cell>
          <table:table-cell table:style-name="Table1.B2" office:value-type="string">
            <text:p text:style-name="P3">Then said he unto them, Therefore every scribe which is instructed unto the kingdom of heaven is like unto a man that is an householder, which bringeth forth out of his <text:span text:style-name="T1">treasure</text:span><text:span text:style-name="T2">G2344</text:span> things new and old.</text:p>
          </table:table-cell>
        </table:table-row>
        <table:table-row>
          <table:table-cell table:style-name="Table1.A2" office:value-type="string">
            <text:p text:style-name="P1">Mat 19:21</text:p>
          </table:table-cell>
          <table:table-cell table:style-name="Table1.B2" office:value-type="string">
            <text:p text:style-name="P3">Jesus said unto him, If thou wilt be perfect, go and sell that thou hast, and give to the poor, and thou shalt have <text:span text:style-name="T1">treasure</text:span><text:span text:style-name="T2">G2344</text:span> in heaven: and come and follow me.</text:p>
          </table:table-cell>
        </table:table-row>
        <table:table-row>
          <table:table-cell table:style-name="Table1.A2" office:value-type="string">
            <text:p text:style-name="P1">Mar 10:21</text:p>
          </table:table-cell>
          <table:table-cell table:style-name="Table1.B2" office:value-type="string">
            <text:p text:style-name="P3">Then Jesus beholding him loved him, and said unto him, One thing thou lackest: go thy way, sell whatsoever thou hast, and give to the poor, and thou shalt have <text:span text:style-name="T1">treasure</text:span><text:span text:style-name="T2">G2344</text:span> in heaven: and come, take up the cross, and follow me.</text:p>
          </table:table-cell>
        </table:table-row>
        <table:table-row>
          <table:table-cell table:style-name="Table1.A2" office:value-type="string">
            <text:p text:style-name="P1">Luk 6:45</text:p>
          </table:table-cell>
          <table:table-cell table:style-name="Table1.B2" office:value-type="string">
            <text:p text:style-name="P3">A good man out of the good <text:span text:style-name="T1">treasure</text:span><text:span text:style-name="T2">G2344</text:span> of his heart bringeth forth that which is good; and an evil man out of the evil <text:span text:style-name="T1">treasure</text:span><text:span text:style-name="T2">G2344</text:span> of his heart bringeth forth that which is evil: for of the abundance of the heart his mouth speaketh.</text:p>
          </table:table-cell>
        </table:table-row>
        <table:table-row>
          <table:table-cell table:style-name="Table1.A2" office:value-type="string">
            <text:p text:style-name="P1">Luk 12:33</text:p>
          </table:table-cell>
          <table:table-cell table:style-name="Table1.B2" office:value-type="string">
            <text:p text:style-name="P3">Sell that ye have, and give alms; provide yourselves bags which wax not old<text:span text:style-name="T1">, a treasure</text:span><text:span text:style-name="T2">G2344</text:span> in the heavens that faileth not, where no thief approacheth, neither moth corrupteth.</text:p>
          </table:table-cell>
        </table:table-row>
        <table:table-row>
          <table:table-cell table:style-name="Table1.A2" office:value-type="string">
            <text:p text:style-name="P1">Luk 12:34</text:p>
          </table:table-cell>
          <table:table-cell table:style-name="Table1.B2" office:value-type="string">
            <text:p text:style-name="P3">For where your <text:span text:style-name="T1">treasure</text:span><text:span text:style-name="T2">G2344</text:span> is, there will your heart be also.</text:p>
          </table:table-cell>
        </table:table-row>
        <table:table-row>
          <table:table-cell table:style-name="Table1.A2" office:value-type="string">
            <text:p text:style-name="P1">Luk 18:22</text:p>
          </table:table-cell>
          <table:table-cell table:style-name="Table1.B2" office:value-type="string">
            <text:p text:style-name="P3">Now when Jesus heard these things, he said unto him, Yet lackest thou one thing: sell all that thou hast, and distribute unto the poor, and thou shalt have <text:span text:style-name="T1">treasure</text:span><text:span text:style-name="T2">G2344</text:span> in heaven: and come, follow me.</text:p>
          </table:table-cell>
        </table:table-row>
        <table:table-row>
          <table:table-cell table:style-name="Table1.A2" office:value-type="string">
            <text:p text:style-name="P1">2Co 4:7</text:p>
          </table:table-cell>
          <table:table-cell table:style-name="Table1.B2" office:value-type="string">
            <text:p text:style-name="P3">But we have this <text:span text:style-name="T1">treasure</text:span><text:span text:style-name="T2">G2344</text:span> in earthen vessels, that the excellency of the power may be of God, and not of us.</text:p>
          </table:table-cell>
        </table:table-row>
        <table:table-row>
          <table:table-cell table:style-name="Table1.A2" office:value-type="string">
            <text:p text:style-name="P1">Col 2:3</text:p>
          </table:table-cell>
          <table:table-cell table:style-name="Table1.B2" office:value-type="string">
            <text:p text:style-name="P2">In whom are hid all <text:span text:style-name="T1">the treasures</text:span><text:span text:style-name="T2">G2344</text:span> of wisdom and knowledge.</text:p>
          </table:table-cell>
        </table:table-row>
        <table:table-row>
          <table:table-cell table:style-name="Table1.A2" office:value-type="string">
            <text:p text:style-name="P1">Heb 11:26</text:p>
          </table:table-cell>
          <table:table-cell table:style-name="Table1.B2" office:value-type="string">
            <text:p text:style-name="P2">Esteeming the reproach of Christ greater riches than <text:span text:style-name="T1">the treasures</text:span><text:span text:style-name="T2">G2344</text:span> in Egypt: for he had respect unto the recompence of the reward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"><text:span text:style-name="T3">Hebrew and Greek Dictionaries w/TVM, Strong</text:span> - <text:span text:style-name="T4">G2344</text:span> </text:p>
            <text:p text:style-name="P5"><text:span text:style-name="T5">θησαυρός</text:span> (thēsaurós | thay-sow-ros')</text:p>
            <text:p text:style-name="P6"><text:span text:style-name="T6">Derivation: </text:span><text:span text:style-name="T7">from G5087;<text:line-break/></text:span><text:span text:style-name="T6">Strong's: </text:span><text:span text:style-name="T7">a deposit, i.e. wealth (literally or figuratively)<text:line-break/></text:span><text:span text:style-name="T6">KJV: </text:span><text:span text:style-name="T7">—treasure</text:span><text:span text:style-name="T8">(s)</text:span><text:span text:style-name="T7">.<text:line-break/><text:line-break/></text:span><text:span text:style-name="T9">See: </text:span><text:span text:style-name="T7">G5087<text:line-break/><text:line-break/></text:span><text:span text:style-name="T6">Cognate Group:</text:span><text:span text:style-name="T7"> G2343 (lay up), G2344 (treasure)</text:span></text:p>
            <text:p text:style-name="P6"><text:span text:style-name="T9">Variants:</text:span><text:span text:style-name="T7"> </text:span><text:span text:style-name="T10">θησαυρός</text:span><text:span text:style-name="T7"> <text:line-break/></text:span><text:span text:style-name="T9">Hebrew Equivalents: </text:span><text:span text:style-name="T10">אֹוצָר</text:span><text:span text:style-name="T7">, </text:span><text:span text:style-name="T10">בַּר</text:span><text:span text:style-name="T7">, </text:span><text:span text:style-name="T10">גֶּנֶז</text:span><text:span text:style-name="T7">, </text:span><text:span text:style-name="T10">הֵיכָל</text:span><text:span text:style-name="T7">, </text:span><text:span text:style-name="T10">חֹסֶן</text:span><text:span text:style-name="T7">, </text:span><text:span text:style-name="T10">לִשְׁכָּה</text:span><text:span text:style-name="T7">, </text:span><text:span text:style-name="T10">מַטְמֹון</text:span><text:span text:style-name="T7">, </text:span><text:span text:style-name="T10">תְּבוּאָה </text:span><text:span text:style-name="T11">(H214, H1249, H1595, </text:span><text:span text:style-name="T12">H1596, </text:span><text:span text:style-name="T11">H1964, H2633, </text:span><text:span text:style-name="T13">H3957, </text:span><text:span text:style-name="T14">H4301, </text:span><text:span text:style-name="T15">H5459, </text:span><text:span text:style-name="T14">H8393)</text:span></text:p>
            <text:p text:style-name="P7"/>
            <text:p text:style-name="P8"><text:span text:style-name="T16">AV Occurrences</text:span><text:span text:style-name="T7"> (18 Instances, 3 Words)<text:line-break/><text:line-break/></text:span><text:span text:style-name="T6">treasures</text:span><text:span text:style-name="T7"> (5)<text:line-break/><text:line-break/>Matt 2:11; 6:19; 6:20; Col 2:3; Heb 11:26<text:line-break/><text:line-break/></text:span><text:span text:style-name="T6">treasure</text:span><text:span text:style-name="T7"> (12)<text:line-break/><text:line-break/>Matt 6:21; 12:35; 12:35; 13:52; 19:21; Mark 10:21; Luke 6:45; 6:45; 12:33; 12:34; 18:22; 2Cor 4:7<text:line-break/><text:line-break/></text:span><text:span text:style-name="T6">unto treasure</text:span><text:span text:style-name="T7"> (1)<text:line-break/><text:line-break/>Matt 13:44</text:span></text:p>
            <text:p text:style-name="P9"/>
            <text:p text:style-name="P10">Greek Strongs numbers associated with “treasure”: G1047, G234<text:span text:style-name="T17">3</text:span>, G234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1">Hebrew and Greek Dictionaries w/TVM, Strong - G1047</text:p>
            <text:p text:style-name="P12">Feminine Noun</text:p>
            <text:p text:style-name="P11">γάζα (gáza | gad'-zah)</text:p>
            <text:p text:style-name="P11">Derivation: of foreign origin;</text:p>
            <text:p text:style-name="P11">Strong's: a treasure</text:p>
            <text:p text:style-name="P11">KJV: —treasure.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Hebrew and Greek Dictionaries w/TVM, Strong - G2343</text:p>
            <text:p text:style-name="P13">Verb</text:p>
            <text:p text:style-name="Table_20_Contents">θησαυρίζω (thēsaurízō | thay-sow-rid'-zo)</text:p>
            <text:p text:style-name="Table_20_Contents">Derivation: from <text:span text:style-name="T18">G2344</text:span>;</text:p>
            <text:p text:style-name="Table_20_Contents">Strong's: to amass or reserve (literally or figuratively)</text:p>
            <text:p text:style-name="Table_20_Contents">KJV: —lay up (treasure), (keep) in store, (heap) treasure (together, up).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Hebrew and Greek Dictionaries w/TVM, Strong - <text:span text:style-name="T18">G2344</text:span></text:p>
            <text:p text:style-name="P14">Masculine noun</text:p>
            <text:p text:style-name="Table_20_Contents">θησαυρός (thēsaurós | thay-sow-ros')</text:p>
            <text:p text:style-name="Table_20_Contents">Derivation: from G5087;</text:p>
            <text:p text:style-name="Table_20_Contents">Strong's: a deposit, i.e. wealth (literally or figuratively)</text:p>
            <text:p text:style-name="Table_20_Contents">KJV: —treasur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5">All English words/phrase associated with “treasure”</text:p>
          </table:table-cell>
          <table:covered-table-cell/>
        </table:table-row>
        <table:table-row>
          <table:table-cell table:style-name="Table4.A2" office:value-type="string">
            <text:p text:style-name="P16">all the strength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mong my treasures</text:p>
          </table:table-cell>
          <table:table-cell table:style-name="Table4.B2" office:value-type="string">
            <text:p text:style-name="P17">3</text:p>
          </table:table-cell>
        </table:table-row>
        <table:table-row>
          <table:table-cell table:style-name="Table4.A2" office:value-type="string">
            <text:p text:style-name="P16">among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all the store</text:p>
          </table:table-cell>
          <table:table-cell table:style-name="Table4.B2" office:value-type="string">
            <text:p text:style-name="P17">3</text:p>
          </table:table-cell>
        </table:table-row>
        <table:table-row>
          <table:table-cell table:style-name="Table4.A2" office:value-type="string">
            <text:p text:style-name="P16">and all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hidden rich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in the treasures</text:p>
          </table:table-cell>
          <table:table-cell table:style-name="Table4.B2" office:value-type="string">
            <text:p text:style-name="P17">3</text:p>
          </table:table-cell>
        </table:table-row>
        <table:table-row>
          <table:table-cell table:style-name="Table4.A2" office:value-type="string">
            <text:p text:style-name="P16">and in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f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ver the cellar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ver the storehous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ove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strength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their treasures</text:p>
          </table:table-cell>
          <table:table-cell table:style-name="Table4.B2" office:value-type="string">
            <text:p text:style-name="P17">1</text:p>
          </table:table-cell>
        </table:table-row>
        <text:soft-page-break/>
        <table:table-row>
          <table:table-cell table:style-name="Table4.A2" office:value-type="string">
            <text:p text:style-name="P18">and the peculiar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the treasures</text:p>
          </table:table-cell>
          <table:table-cell table:style-name="Table4.B2" office:value-type="string">
            <text:p text:style-name="P17">7</text:p>
          </table:table-cell>
        </table:table-row>
        <table:table-row>
          <table:table-cell table:style-name="Table4.A2" office:value-type="string">
            <text:p text:style-name="P16">and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and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a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cellar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her as for hid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for his peculiar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it more than for hid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rich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fo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he among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himself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his armoury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he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his treasures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 sto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storehous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them, and sto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the treasures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to the storehous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into the treasure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to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to the treasury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into thy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n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is he that layeth up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is his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is upon he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kept in store</text:p>
          </table:table-cell>
          <table:table-cell table:style-name="Table4.B2" office:value-type="string">
            <text:p text:style-name="P17">1</text:p>
          </table:table-cell>
        </table:table-row>
        <text:soft-page-break/>
        <table:table-row>
          <table:table-cell table:style-name="Table4.A2" office:value-type="string">
            <text:p text:style-name="P16">Lay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lay 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my jewel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mine own proper good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store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of thei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f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r concerning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ut of his treasures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out of his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ut of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over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Storehous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e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e to be a peculiar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e to be a special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 garner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ir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m to the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nce all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n ye shall be a peculiar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re is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hereof, and all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he treasure</text:p>
          </table:table-cell>
          <table:table-cell table:style-name="Table4.B2" office:value-type="string">
            <text:p text:style-name="P17">2</text:p>
          </table:table-cell>
        </table:table-row>
        <table:table-row>
          <table:table-cell table:style-name="Table4.A2" office:value-type="string">
            <text:p text:style-name="P16">the treasures</text:p>
          </table:table-cell>
          <table:table-cell table:style-name="Table4.B2" office:value-type="string">
            <text:p text:style-name="P17">6</text:p>
          </table:table-cell>
        </table:table-row>
        <table:table-row>
          <table:table-cell table:style-name="Table4.A2" office:value-type="string">
            <text:p text:style-name="P16">to be his peculiar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o lay 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to the treasure</text:p>
          </table:table-cell>
          <table:table-cell table:style-name="Table4.B2" office:value-type="string">
            <text:p text:style-name="P17">2</text:p>
          </table:table-cell>
        </table:table-row>
        <text:soft-page-break/>
        <table:table-row>
          <table:table-cell table:style-name="Table4.A2" office:value-type="string">
            <text:p text:style-name="P18">treasure</text:p>
          </table:table-cell>
          <table:table-cell table:style-name="Table4.B2" office:value-type="string">
            <text:p text:style-name="P17">18</text:p>
          </table:table-cell>
        </table:table-row>
        <table:table-row>
          <table:table-cell table:style-name="Table4.A2" office:value-type="string">
            <text:p text:style-name="P16">treasures</text:p>
          </table:table-cell>
          <table:table-cell table:style-name="Table4.B2" office:value-type="string">
            <text:p text:style-name="P17">5</text:p>
          </table:table-cell>
        </table:table-row>
        <table:table-row>
          <table:table-cell table:style-name="Table4.A2" office:value-type="string">
            <text:p text:style-name="P16">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reasurest 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under the treasury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unto the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unto the treasuri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unto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up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was ove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were over all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which were over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Ye have heaped treasure together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yet the treasures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8">you treasure</text:p>
          </table:table-cell>
          <table:table-cell table:style-name="Table4.B2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6">Total</text:p>
          </table:table-cell>
          <table:table-cell table:style-name="Table4.B2" office:value-type="string">
            <text:p text:style-name="P19">135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briela" svg:font-family="Gabriela, sans-serif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0T10:56:06.361013700</meta:creation-date>
    <dc:title>default</dc:title>
    <meta:editing-duration>PT47M16S</meta:editing-duration>
    <meta:editing-cycles>20</meta:editing-cycles>
    <meta:generator>LibreOffice/26.2.4.2$Linux_X86_64 LibreOffice_project/64a984c51f4702dbd3710b13428c673a2f1292e7</meta:generator>
    <dc:date>2026-07-11T12:31:46.463863315</dc:date>
    <meta:document-statistic meta:table-count="6" meta:image-count="0" meta:object-count="0" meta:page-count="6" meta:paragraph-count="238" meta:word-count="1047" meta:character-count="5645" meta:non-whitespace-character-count="4824"/>
    <meta:template xlink:type="simple" xlink:actuate="onRequest" xlink:title="default" xlink:href="../../../../../AppData/Roaming/LibreOffice/4/user/template/default.ott" meta:date="2025-08-30T10:56:05.286563600"/>
  </office:meta>
</office:document-meta>
</file>