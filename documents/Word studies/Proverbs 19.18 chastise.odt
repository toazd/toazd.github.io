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7.8979in" table:align="left"/>
    </style:style>
    <style:style style:name="Table2.A" style:family="table-column">
      <style:table-column-properties style:column-width="0.9632in"/>
    </style:style>
    <style:style style:name="Table2.B" style:family="table-column">
      <style:table-column-properties style:column-width="6.9347in"/>
    </style:style>
    <style:style style:name="Table2.1" style:family="table-row">
      <style:table-row-properties fo:keep-together="always"/>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paragraph-properties fo:text-align="left" style:justify-single-word="false"/>
      <style:text-properties fo:color="#127622" loext:opacity="100%" style:font-name="Liberation Sans" fo:font-size="12pt" officeooo:paragraph-rsid="000d5303" style:font-size-asian="12pt" style:font-size-complex="12pt"/>
    </style:style>
    <style:style style:name="P2" style:family="paragraph" style:parent-style-name="Table_20_Contents">
      <style:paragraph-properties fo:text-align="left" style:justify-single-word="false"/>
      <style:text-properties style:font-name="Liberation Sans" fo:font-size="12pt" officeooo:paragraph-rsid="000d5303" style:font-size-asian="12pt" style:font-size-complex="12pt"/>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officeooo:rsid="000e0ee0" officeooo:paragraph-rsid="000e0ee0" style:font-size-asian="12pt" style:font-size-complex="12pt"/>
    </style:style>
    <style:style style:name="P5" style:family="paragraph" style:parent-style-name="Standard" style:list-style-name="L1">
      <style:text-properties style:font-name="Liberation Sans" fo:font-size="12pt" officeooo:rsid="000e0ee0" officeooo:paragraph-rsid="000e0ee0" style:font-size-asian="12pt" style:font-size-complex="12pt"/>
    </style:style>
    <style:style style:name="P6" style:family="paragraph" style:parent-style-name="Standard" style:list-style-name="L1">
      <style:text-properties fo:color="#127622" loext:opacity="100%" style:font-name="Liberation Sans" fo:font-size="12pt" officeooo:rsid="00447a5d" officeooo:paragraph-rsid="00447a5d" style:font-size-asian="12pt" style:font-size-complex="12pt"/>
    </style:style>
    <style:style style:name="P7" style:family="paragraph" style:parent-style-name="Standard" style:list-style-name="L1">
      <style:text-properties style:font-name="Liberation Sans" fo:font-size="12pt" officeooo:rsid="000e7047" officeooo:paragraph-rsid="000e7047" style:font-size-asian="12pt" style:font-size-complex="12pt"/>
    </style:style>
    <style:style style:name="P8" style:family="paragraph" style:parent-style-name="Standard" style:list-style-name="L1">
      <style:text-properties fo:color="#127622" loext:opacity="100%" style:font-name="Liberation Sans" fo:font-size="12pt" officeooo:rsid="0045bebb" officeooo:paragraph-rsid="0045bebb" style:font-size-asian="12pt" style:font-size-complex="12pt"/>
    </style:style>
    <style:style style:name="P9" style:family="paragraph" style:parent-style-name="Standard" style:list-style-name="L1">
      <style:text-properties style:font-name="Liberation Sans" fo:font-size="12pt" officeooo:rsid="0045d3c5" officeooo:paragraph-rsid="0045d3c5" style:font-size-asian="12pt" style:font-size-complex="12pt"/>
    </style:style>
    <style:style style:name="P10" style:family="paragraph" style:parent-style-name="Standard" style:list-style-name="L1">
      <style:text-properties style:font-name="Liberation Sans" fo:font-size="12pt" officeooo:rsid="0016ed1e" officeooo:paragraph-rsid="0016ed1e" style:font-size-asian="12pt" style:font-size-complex="12pt"/>
    </style:style>
    <style:style style:name="P11" style:family="paragraph" style:parent-style-name="Standard" style:list-style-name="L1">
      <style:text-properties style:font-name="Liberation Sans" fo:font-size="12pt" officeooo:rsid="004dc038" officeooo:paragraph-rsid="004dc038" style:font-size-asian="12pt" style:font-size-complex="12pt"/>
    </style:style>
    <style:style style:name="P12" style:family="paragraph" style:parent-style-name="Standard" style:list-style-name="L1">
      <style:text-properties style:font-name="Liberation Sans" fo:font-size="12pt" officeooo:rsid="00135a1a" officeooo:paragraph-rsid="00135a1a" style:font-size-asian="12pt" style:font-size-complex="12pt"/>
    </style:style>
    <style:style style:name="P13" style:family="paragraph" style:parent-style-name="Standard" style:list-style-name="L1">
      <style:text-properties style:font-name="Liberation Sans" fo:font-size="12pt" officeooo:rsid="00514651" officeooo:paragraph-rsid="00514651" style:font-size-asian="12pt" style:font-size-complex="12pt"/>
    </style:style>
    <style:style style:name="P14" style:family="paragraph" style:parent-style-name="Standard" style:list-style-name="L1">
      <style:text-properties style:font-name="Liberation Sans" fo:font-size="12pt" officeooo:rsid="00136932" officeooo:paragraph-rsid="00136932" style:font-size-asian="12pt" style:font-size-complex="12pt"/>
    </style:style>
    <style:style style:name="P15" style:family="paragraph" style:parent-style-name="Standard" style:list-style-name="L1">
      <style:text-properties fo:color="#127622" loext:opacity="100%" style:font-name="Liberation Sans" fo:font-size="12pt" officeooo:rsid="0057f7df" officeooo:paragraph-rsid="0057f7df" style:font-size-asian="12pt" style:font-size-complex="12pt"/>
    </style:style>
    <style:style style:name="P16" style:family="paragraph" style:parent-style-name="Standard" style:list-style-name="L1">
      <style:text-properties style:font-name="Liberation Sans" fo:font-size="12pt" officeooo:rsid="00138f76" officeooo:paragraph-rsid="00138f76" style:font-size-asian="12pt" style:font-size-complex="12pt"/>
    </style:style>
    <style:style style:name="P17" style:family="paragraph" style:parent-style-name="Standard" style:list-style-name="L1">
      <style:text-properties fo:color="#127622" loext:opacity="100%" style:font-name="Liberation Sans" fo:font-size="12pt" officeooo:rsid="005a5507" officeooo:paragraph-rsid="005a5507" style:font-size-asian="12pt" style:font-size-complex="12pt"/>
    </style:style>
    <style:style style:name="P18" style:family="paragraph" style:parent-style-name="Standard" style:list-style-name="L1">
      <style:text-properties style:font-name="Liberation Sans" fo:font-size="12pt" officeooo:rsid="00206334" officeooo:paragraph-rsid="00206334" style:font-size-asian="12pt" style:font-size-complex="12pt"/>
    </style:style>
    <style:style style:name="P19" style:family="paragraph" style:parent-style-name="Standard" style:list-style-name="L1">
      <style:text-properties fo:color="#127622" loext:opacity="100%" style:font-name="Liberation Sans" fo:font-size="12pt" officeooo:rsid="005c328d" officeooo:paragraph-rsid="005c328d" style:font-size-asian="12pt" style:font-size-complex="12pt"/>
    </style:style>
    <style:style style:name="P20" style:family="paragraph" style:parent-style-name="Standard">
      <style:text-properties style:font-name="Liberation Sans" fo:font-size="12pt" officeooo:rsid="0017f618" officeooo:paragraph-rsid="0017f618" style:font-size-asian="12pt" style:font-size-complex="12pt"/>
    </style:style>
    <style:style style:name="P21" style:family="paragraph" style:parent-style-name="Standard" style:list-style-name="L2">
      <style:text-properties style:font-name="Liberation Sans" fo:font-size="12pt" officeooo:rsid="0017f618" officeooo:paragraph-rsid="0017f618" style:font-size-asian="12pt" style:font-size-complex="12pt"/>
    </style:style>
    <style:style style:name="P22" style:family="paragraph" style:parent-style-name="Standard" style:list-style-name="L2">
      <style:text-properties style:font-name="Liberation Sans" fo:font-size="12pt" officeooo:rsid="00199d6a" officeooo:paragraph-rsid="00199d6a" style:font-size-asian="12pt" style:font-size-complex="12pt"/>
    </style:style>
    <style:style style:name="P23" style:family="paragraph" style:parent-style-name="Standard">
      <style:text-properties style:font-name="Liberation Sans" fo:font-size="12pt" officeooo:rsid="0019c4b5" officeooo:paragraph-rsid="0019c4b5" style:font-size-asian="12pt" style:font-size-complex="12pt"/>
    </style:style>
    <style:style style:name="P24" style:family="paragraph" style:parent-style-name="Standard">
      <style:text-properties style:font-name="Liberation Sans" fo:font-size="12pt" officeooo:rsid="001cdfda" officeooo:paragraph-rsid="001cdfda" style:font-size-asian="12pt" style:font-size-complex="12pt"/>
    </style:style>
    <style:style style:name="P25" style:family="paragraph" style:parent-style-name="Standard">
      <style:text-properties style:font-name="Liberation Sans" fo:font-size="12pt" officeooo:rsid="001d9cfa" officeooo:paragraph-rsid="001d9cfa" style:font-size-asian="12pt" style:font-size-complex="12pt"/>
    </style:style>
    <style:style style:name="P26" style:family="paragraph" style:parent-style-name="Standard">
      <style:text-properties style:font-name="Liberation Sans" fo:font-size="12pt" officeooo:rsid="0027a915" officeooo:paragraph-rsid="0027a915" style:font-size-asian="12pt" style:font-size-complex="12pt"/>
    </style:style>
    <style:style style:name="P27" style:family="paragraph" style:parent-style-name="Standard">
      <style:text-properties style:font-name="Liberation Sans" fo:font-size="12pt" officeooo:rsid="001a84e7" officeooo:paragraph-rsid="0023de3d" style:font-size-asian="12pt" style:font-size-complex="12pt"/>
    </style:style>
    <style:style style:name="P28" style:family="paragraph" style:parent-style-name="Standard" style:list-style-name="L3">
      <style:text-properties style:font-name="Liberation Sans" fo:font-size="12pt" officeooo:rsid="0019c4b5" officeooo:paragraph-rsid="0023de3d" style:font-size-asian="12pt" style:font-size-complex="12pt"/>
    </style:style>
    <style:style style:name="P29" style:family="paragraph" style:parent-style-name="Standard" style:list-style-name="L3">
      <style:text-properties style:font-name="Liberation Sans" fo:font-size="12pt" officeooo:rsid="0025b3a1" officeooo:paragraph-rsid="0023de3d" style:font-size-asian="12pt" style:font-size-complex="12pt"/>
    </style:style>
    <style:style style:name="P30" style:family="paragraph" style:parent-style-name="Standard" style:list-style-name="L3">
      <style:text-properties style:font-name="Liberation Sans" fo:font-size="12pt" officeooo:rsid="00342d5f" officeooo:paragraph-rsid="0023de3d" style:font-size-asian="12pt" style:font-size-complex="12pt"/>
    </style:style>
    <style:style style:name="P31" style:family="paragraph" style:parent-style-name="Standard" style:list-style-name="L3">
      <style:text-properties style:font-name="Liberation Sans" fo:font-size="12pt" officeooo:rsid="0035b264" officeooo:paragraph-rsid="00369fe7" style:font-size-asian="12pt" style:font-size-complex="12pt"/>
    </style:style>
    <style:style style:name="P32" style:family="paragraph" style:parent-style-name="Standard" style:list-style-name="L3">
      <style:text-properties style:font-name="Liberation Sans" fo:font-size="12pt" officeooo:rsid="00369fe7" officeooo:paragraph-rsid="00387129" style:font-size-asian="12pt" style:font-size-complex="12pt"/>
    </style:style>
    <style:style style:name="P33" style:family="paragraph" style:parent-style-name="Standard" style:list-style-name="L3">
      <style:text-properties style:font-name="Liberation Sans" fo:font-size="12pt" officeooo:rsid="0038783b" officeooo:paragraph-rsid="0038783b" style:font-size-asian="12pt" style:font-size-complex="12pt"/>
    </style:style>
    <style:style style:name="P34" style:family="paragraph" style:parent-style-name="Standard">
      <style:text-properties style:font-name="Liberation Sans" fo:font-size="12pt" officeooo:rsid="0038783b" officeooo:paragraph-rsid="0038783b" style:font-size-asian="12pt" style:font-size-complex="12pt"/>
    </style:style>
    <style:style style:name="P3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36" style:family="paragraph" style:parent-style-name="Table_20_Contents">
      <style:paragraph-properties fo:margin-left="0in" fo:margin-right="0in" fo:margin-top="0in" fo:margin-bottom="0in" style:contextual-spacing="false" style:line-height-at-least="0.2398in" fo:text-align="left" style:justify-single-word="false" fo:text-indent="0in" style:auto-text-indent="false"/>
      <style:text-properties fo:font-variant="normal" fo:text-transform="none" style:font-name="Liberation Sans" fo:font-size="12pt" fo:font-style="normal" fo:font-weight="normal" style:font-size-asian="12pt" style:font-size-complex="12pt"/>
    </style:style>
    <style:style style:name="T1" style:family="text">
      <style:text-properties style:text-position="super 58%" fo:background-color="#fff5ce" loext:char-shading-value="0"/>
    </style:style>
    <style:style style:name="T2" style:family="text">
      <style:text-properties style:text-underline-style="none"/>
    </style:style>
    <style:style style:name="T3" style:family="text">
      <style:text-properties style:text-underline-style="none" officeooo:rsid="002245cf"/>
    </style:style>
    <style:style style:name="T4" style:family="text">
      <style:text-properties style:text-underline-style="none" officeooo:rsid="0017f618"/>
    </style:style>
    <style:style style:name="T5" style:family="text">
      <style:text-properties officeooo:rsid="0017f618"/>
    </style:style>
    <style:style style:name="T6" style:family="text">
      <style:text-properties officeooo:rsid="006066b8"/>
    </style:style>
    <style:style style:name="T7" style:family="text">
      <style:text-properties officeooo:rsid="006013f9"/>
    </style:style>
    <style:style style:name="T8" style:family="text">
      <style:text-properties officeooo:rsid="006013f9" fo:background-color="#fff5ce" loext:char-shading-value="0"/>
    </style:style>
    <style:style style:name="T9" style:family="text">
      <style:text-properties officeooo:rsid="00145d2f"/>
    </style:style>
    <style:style style:name="T10" style:family="text">
      <style:text-properties fo:color="#127622" loext:opacity="100%"/>
    </style:style>
    <style:style style:name="T11" style:family="text">
      <style:text-properties fo:color="#127622" loext:opacity="100%" officeooo:rsid="00466ed0"/>
    </style:style>
    <style:style style:name="T12" style:family="text">
      <style:text-properties officeooo:rsid="00466ed0"/>
    </style:style>
    <style:style style:name="T13" style:family="text">
      <style:text-properties fo:color="#127622" loext:opacity="100%" officeooo:rsid="0048069a"/>
    </style:style>
    <style:style style:name="T14" style:family="text">
      <style:text-properties officeooo:rsid="0048069a"/>
    </style:style>
    <style:style style:name="T15" style:family="text">
      <style:text-properties fo:color="#127622" loext:opacity="100%" officeooo:rsid="0049e708"/>
    </style:style>
    <style:style style:name="T16" style:family="text">
      <style:text-properties officeooo:rsid="0049e708"/>
    </style:style>
    <style:style style:name="T17" style:family="text">
      <style:text-properties fo:color="#127622" loext:opacity="100%" officeooo:rsid="004a1911"/>
    </style:style>
    <style:style style:name="T18" style:family="text">
      <style:text-properties officeooo:rsid="004a1911"/>
    </style:style>
    <style:style style:name="T19" style:family="text">
      <style:text-properties fo:color="#127622" loext:opacity="100%" officeooo:rsid="004bd901"/>
    </style:style>
    <style:style style:name="T20" style:family="text">
      <style:text-properties fo:color="#127622" loext:opacity="100%" officeooo:rsid="004ebaf9"/>
    </style:style>
    <style:style style:name="T21" style:family="text">
      <style:text-properties officeooo:rsid="004ebaf9"/>
    </style:style>
    <style:style style:name="T22" style:family="text">
      <style:text-properties fo:color="#127622" loext:opacity="100%" officeooo:rsid="004f87c4"/>
    </style:style>
    <style:style style:name="T23" style:family="text">
      <style:text-properties officeooo:rsid="004f87c4"/>
    </style:style>
    <style:style style:name="T24" style:family="text">
      <style:text-properties fo:color="#127622" loext:opacity="100%" officeooo:rsid="0050aa57"/>
    </style:style>
    <style:style style:name="T25" style:family="text">
      <style:text-properties officeooo:rsid="0050aa57"/>
    </style:style>
    <style:style style:name="T26" style:family="text">
      <style:text-properties fo:color="#127622" loext:opacity="100%" officeooo:rsid="0051ecc1"/>
    </style:style>
    <style:style style:name="T27" style:family="text">
      <style:text-properties fo:color="#127622" loext:opacity="100%" officeooo:rsid="00523f78"/>
    </style:style>
    <style:style style:name="T28" style:family="text">
      <style:text-properties officeooo:rsid="00523f78"/>
    </style:style>
    <style:style style:name="T29" style:family="text">
      <style:text-properties fo:color="#127622" loext:opacity="100%" officeooo:rsid="0052ecfb"/>
    </style:style>
    <style:style style:name="T30" style:family="text">
      <style:text-properties officeooo:rsid="0052ecfb"/>
    </style:style>
    <style:style style:name="T31" style:family="text">
      <style:text-properties fo:color="#127622" loext:opacity="100%" officeooo:rsid="0053ae56"/>
    </style:style>
    <style:style style:name="T32" style:family="text">
      <style:text-properties officeooo:rsid="0053ae56"/>
    </style:style>
    <style:style style:name="T33" style:family="text">
      <style:text-properties fo:color="#127622" loext:opacity="100%" officeooo:rsid="0054bdb1"/>
    </style:style>
    <style:style style:name="T34" style:family="text">
      <style:text-properties officeooo:rsid="0054bdb1"/>
    </style:style>
    <style:style style:name="T35" style:family="text">
      <style:text-properties fo:color="#127622" loext:opacity="100%" officeooo:rsid="00561e60"/>
    </style:style>
    <style:style style:name="T36" style:family="text">
      <style:text-properties style:text-underline-style="solid" style:text-underline-width="auto" style:text-underline-color="font-color"/>
    </style:style>
    <style:style style:name="T37" style:family="text">
      <style:text-properties officeooo:rsid="001ff82f"/>
    </style:style>
    <style:style style:name="T38" style:family="text">
      <style:text-properties style:text-underline-style="solid" style:text-underline-width="auto" style:text-underline-color="font-color" officeooo:rsid="0027a915"/>
    </style:style>
    <style:style style:name="T39" style:family="text">
      <style:text-properties officeooo:rsid="001e5b4a"/>
    </style:style>
    <style:style style:name="T40" style:family="text">
      <style:text-properties officeooo:rsid="003c9ade"/>
    </style:style>
    <style:style style:name="T41" style:family="text">
      <style:text-properties officeooo:rsid="0042a382"/>
    </style:style>
    <style:style style:name="T42" style:family="text">
      <style:text-properties officeooo:rsid="003e4d75"/>
    </style:style>
    <style:style style:name="T43" style:family="text">
      <style:text-properties fo:color="#127622" loext:opacity="100%" officeooo:rsid="001e5b4a"/>
    </style:style>
    <style:style style:name="T44" style:family="text">
      <style:text-properties officeooo:rsid="002ff91c"/>
    </style:style>
    <style:style style:name="T45" style:family="text">
      <style:text-properties officeooo:rsid="002a8a30"/>
    </style:style>
    <style:style style:name="T46" style:family="text">
      <style:text-properties officeooo:rsid="00304a39"/>
    </style:style>
    <style:style style:name="T47" style:family="text">
      <style:text-properties officeooo:rsid="002b6314"/>
    </style:style>
    <style:style style:name="T48" style:family="text">
      <style:text-properties officeooo:rsid="002c4904"/>
    </style:style>
    <style:style style:name="T49" style:family="text">
      <style:text-properties officeooo:rsid="002c928c"/>
    </style:style>
    <style:style style:name="T50" style:family="text">
      <style:text-properties officeooo:rsid="002e8c8d"/>
    </style:style>
    <style:style style:name="T51" style:family="text">
      <style:text-properties officeooo:rsid="004395e7"/>
    </style:style>
    <style:style style:name="T52" style:family="text">
      <style:text-properties style:text-underline-style="solid" style:text-underline-width="auto" style:text-underline-color="font-color" officeooo:rsid="001cdfda"/>
    </style:style>
    <style:style style:name="T53" style:family="text">
      <style:text-properties style:text-underline-style="solid" style:text-underline-width="auto" style:text-underline-color="font-color" officeooo:rsid="0023de3d"/>
    </style:style>
    <style:style style:name="T54" style:family="text">
      <style:text-properties officeooo:rsid="001a84e7"/>
    </style:style>
    <style:style style:name="T55" style:family="text">
      <style:text-properties officeooo:rsid="001cdfda"/>
    </style:style>
    <style:style style:name="T56" style:family="text">
      <style:text-properties officeooo:rsid="0023de3d"/>
    </style:style>
    <style:style style:name="T57" style:family="text">
      <style:text-properties officeooo:rsid="002412e9"/>
    </style:style>
    <style:style style:name="T58" style:family="text">
      <style:text-properties officeooo:rsid="00387129"/>
    </style:style>
    <style:style style:name="T59" style:family="text">
      <style:text-properties officeooo:rsid="0041a4a0"/>
    </style:style>
    <style:style style:name="T60" style:family="text">
      <style:text-properties officeooo:rsid="0038b2dc"/>
    </style:style>
    <style:style style:name="T61" style:family="text">
      <style:text-properties officeooo:rsid="00425e17"/>
    </style:style>
    <style:style style:name="T62" style:family="text">
      <style:text-properties fo:background-color="#fffb00" loext:char-shading-value="0" loext:padding="0.0193in" loext:border="0.74pt solid #d8c79d"/>
    </style:style>
    <style:style style:name="T63" style:family="text">
      <style:text-properties style:text-position="super 58%" fo:background-color="transparent" loext:char-shading-value="0" loext:padding="0.0193in" loext:border="0.74pt solid #d8c7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Proverbs 19:18</text:p>
            <text:p text:style-name="P2">Chasten<text:span text:style-name="T1">H3256</text:span> thy son while there is hope, and let not thy soul spare for his crying.</text:p>
          </table:table-cell>
        </table:table-row>
      </table:table>
      <text:p text:style-name="P3"/>
      <text:p text:style-name="P4"><text:span text:style-name="T2">Summary </text:span><text:span text:style-name="T3">of ideas behind the word </text:span><text:span text:style-name="T4">c</text:span><text:span text:style-name="T5">hasten </text:span><text:span text:style-name="T6">as</text:span><text:span text:style-name="T7"> the primitive root </text:span><text:span text:style-name="T8">H3256</text:span>:</text:p>
      <text:list text:style-name="L1">
        <text:list-item>
          <text:p text:style-name="P5">Punish</text:p>
          <text:list>
            <text:list-item>
              <text:p text:style-name="P6">Lev 26:18</text:p>
            </text:list-item>
          </text:list>
        </text:list-item>
        <text:list-item>
          <text:p text:style-name="P5">Reform</text:p>
          <text:list>
            <text:list-item>
              <text:p text:style-name="P6">Lev 26:23</text:p>
            </text:list-item>
          </text:list>
        </text:list-item>
        <text:list-item>
          <text:p text:style-name="P7">Chast<text:span text:style-name="T9">ise</text:span></text:p>
          <text:list>
            <text:list-item>
              <text:p text:style-name="P8">Lev 26:28</text:p>
            </text:list-item>
          </text:list>
        </text:list-item>
        <text:list-item>
          <text:p text:style-name="P7">Instruct</text:p>
          <text:list>
            <text:list-item>
              <text:p text:style-name="P9"><text:span text:style-name="T10">Deu 4:36</text:span>, <text:span text:style-name="T10">1Ch 15:22</text:span>, <text:span text:style-name="T11">Job 4:3</text:span><text:span text:style-name="T12">, </text:span><text:span text:style-name="T11">Psa 2:10</text:span><text:span text:style-name="T12">, </text:span><text:span text:style-name="T13">Psa 16:7</text:span><text:span text:style-name="T14">, </text:span><text:span text:style-name="T15">Isa 8:11</text:span><text:span text:style-name="T16">, </text:span><text:span text:style-name="T17">Jer 6:8</text:span><text:span text:style-name="T18">, </text:span><text:span text:style-name="T19">2Ti 2:25</text:span></text:p>
            </text:list-item>
          </text:list>
        </text:list-item>
        <text:list-item>
          <text:p text:style-name="P10">Teach</text:p>
          <text:list>
            <text:list-item>
              <text:p text:style-name="P11"><text:span text:style-name="T20">Pro 31:1</text:span><text:span text:style-name="T21">, </text:span><text:span text:style-name="T22">Eze 23:48</text:span><text:span text:style-name="T23">, </text:span><text:span text:style-name="T24">Act 22:3</text:span><text:span text:style-name="T25">, </text:span><text:span text:style-name="T10">Tit 2:12</text:span></text:p>
            </text:list-item>
          </text:list>
        </text:list-item>
        <text:list-item>
          <text:p text:style-name="P12">Correct</text:p>
          <text:list>
            <text:list-item>
              <text:p text:style-name="P13"><text:span text:style-name="T10">Psa 39:11</text:span>, <text:span text:style-name="T26">Pro 29:17,</text:span><text:span text:style-name="T27">19</text:span><text:span text:style-name="T28">, </text:span><text:span text:style-name="T29">Jer 2:19</text:span><text:span text:style-name="T30">, </text:span><text:span text:style-name="T31">10:24</text:span><text:span text:style-name="T32">, </text:span><text:span text:style-name="T33">30:11</text:span><text:span text:style-name="T34">, </text:span><text:span text:style-name="T35">46:28</text:span></text:p>
            </text:list-item>
          </text:list>
        </text:list-item>
        <text:list-item>
          <text:p text:style-name="P14">Sore</text:p>
          <text:list>
            <text:list-item>
              <text:p text:style-name="P15">Psa 118:18</text:p>
            </text:list-item>
          </text:list>
        </text:list-item>
        <text:list-item>
          <text:p text:style-name="P16">Reprove</text:p>
          <text:list>
            <text:list-item>
              <text:p text:style-name="P17">Pro 9:7</text:p>
            </text:list-item>
          </text:list>
        </text:list-item>
        <text:list-item>
          <text:p text:style-name="P18">Bound</text:p>
          <text:list>
            <text:list-item>
              <text:p text:style-name="P19">Hos 7:15</text:p>
            </text:list-item>
          </text:list>
        </text:list-item>
      </text:list>
      <text:p text:style-name="P3"/>
      <text:p text:style-name="P20"><text:span text:style-name="T36">Summary</text:span> (for his crying)</text:p>
      <text:list text:style-name="L2">
        <text:list-item>
          <text:p text:style-name="P21">Hebrew: “to his destruction” / “to cause him to die”</text:p>
        </text:list-item>
        <text:list-item>
          <text:p text:style-name="P21">Referring to his crying after his destruction or death</text:p>
          <text:list>
            <text:list-item>
              <text:p text:style-name="P22">As the result of his mistake</text:p>
            </text:list-item>
          </text:list>
        </text:list-item>
      </text:list>
      <text:p text:style-name="P23"/>
      <text:p text:style-name="P24"><text:span text:style-name="T36">Literally</text:span>:</text:p>
      <text:p text:style-name="P24"><text:tab/>Punish/Reform/Chastise/Instruct/Teach/Correct/Reprove him to avoid his destruction/<text:span text:style-name="T37">death</text:span>.</text:p>
      <text:p text:style-name="P24"/>
      <text:p text:style-name="P25"><text:span text:style-name="T38">Direct </text:span><text:span text:style-name="T36">OT </text:span><text:span text:style-name="T38">e</text:span><text:span text:style-name="T36">xample</text:span>:</text:p>
      <text:p text:style-name="P25"><text:tab/>Eli and his sons. <text:span text:style-name="T39">Eli was rebuked for honoring his sons above God. That could have potentially been avoided if Eli would have </text:span><text:span text:style-name="T40">i</text:span><text:span text:style-name="T39">nstructed, </text:span><text:span text:style-name="T40">c</text:span><text:span text:style-name="T39">orrected, </text:span><text:span text:style-name="T40">r</text:span><text:span text:style-name="T39">eformed, </text:span><text:span text:style-name="T41">or </text:span><text:span text:style-name="T40">p</text:span><text:span text:style-name="T39">unished his sons above the reproof that he did give to them. As we can learn from God’s </text:span><text:span text:style-name="T42">word </text:span><text:span text:style-name="T39">in </text:span><text:span text:style-name="T43">Lev 26</text:span><text:span text:style-name="T39"> and </text:span><text:span text:style-name="T43">Deu 28</text:span><text:span text:style-name="T39">, God’s chastisements meant to correct the children of Israel have </text:span><text:span text:style-name="T41">an </text:span><text:span text:style-name="T39">increasing severity </text:span><text:span text:style-name="T41">to them </text:span><text:span text:style-name="T39">and we should follow His example.</text:span></text:p>
      <text:p text:style-name="P3"/>
      <text:p text:style-name="P26"><text:span text:style-name="T36">Extension examples</text:span>:</text:p>
      <text:p text:style-name="P26"><text:tab/>David, <text:span text:style-name="T44">Tamar, Absalom, and </text:span>Amnon. David was (as far as we are told) completely silent about this atrocity. God’s law provided a means to resolve the situation without death <text:span text:style-name="T45">assuming that Tamar was not betrothed </text:span>(<text:span text:style-name="T10">Deu 22:28,29</text:span>) but Amnon chose to hate her more after raping her. Was he instructed about this? <text:span text:style-name="T46">Was any attempt made to teach and correct him? Not that we know of.</text:span><text:span text:style-name="T47"> Was he reproved, punished, or chastised for raping his sister (IIRC, to different mother)? Not that we are told so </text:span><text:span text:style-name="T48">I</text:span><text:span text:style-name="T47"> assume no </text:span><text:span text:style-name="T48">he was not. </text:span><text:span text:style-name="T49">A</text:span><text:span text:style-name="T48">nd that is at least one reason why this example was given to us by God to learn from</text:span><text:span text:style-name="T47">. Because this situation was not handled </text:span><text:span text:style-name="T50">as God instructed</text:span><text:span text:style-name="T47">, it led to Amnon’s brother </text:span><text:span text:style-name="T50">Absalom </text:span><text:span text:style-name="T47">sinning even f</text:span><text:span text:style-name="T51">u</text:span><text:span text:style-name="T47">rther by taking justice into his own hands and murdering his own brother (IIRC, to a different mother). </text:span><text:span text:style-name="T50">Now, that doesn’t justify Absalom’s actions by any means, but it could have potentially been avoided entirely if both the situation with Tamar and both sons were handled as God instructs.</text:span></text:p>
      <text:p text:style-name="P3"/>
      <text:p text:style-name="P3"/>
      <text:p text:style-name="P3"/>
      <text:p text:style-name="P3"/>
      <text:p text:style-name="P3"/>
      <text:p text:style-name="P3"/>
      <text:p text:style-name="P3"/>
      <text:p text:style-name="P27"><text:soft-page-break/><text:span text:style-name="T52">Application </text:span><text:span text:style-name="T53">by extension </text:span><text:span text:style-name="T52">e</text:span><text:span text:style-name="T36">xamples</text:span>:</text:p>
      <text:list text:style-name="L3">
        <text:list-item>
          <text:p text:style-name="P28"><text:span text:style-name="T54">Instruct/</text:span><text:span text:style-name="T55">teach</text:span><text:span text:style-name="T56"> your children in order</text:span><text:span text:style-name="T54"> to avoid </text:span><text:span text:style-name="T57">discouragement</text:span><text:span text:style-name="T54">.</text:span></text:p>
        </text:list-item>
        <text:list-item>
          <text:p text:style-name="P28">Correct <text:span text:style-name="T56">your children</text:span> to avoid despair.</text:p>
        </text:list-item>
        <text:list-item>
          <text:p text:style-name="P29">Reform and do not ignore bad behavior in your children.</text:p>
        </text:list-item>
        <text:list-item>
          <text:p text:style-name="P30">Punish your children according to their error.</text:p>
        </text:list-item>
        <text:list-item>
          <text:p text:style-name="P30">Set clear boundaries for your children and when they cross them do not fail to punish them accordingly.</text:p>
        </text:list-item>
        <text:list-item>
          <text:p text:style-name="P31">+<text:span text:style-name="T10">Proverbs 22:15</text:span>, if the child has escalated the situation sufficiently, physical punishment may be necessary (a rod is a wooden stick).</text:p>
          <text:list>
            <text:list-item>
              <text:p text:style-name="P32">God’s word teaches us in <text:span text:style-name="T10">Lev 26</text:span> and <text:span text:style-name="T10">Deu 28</text:span> <text:span text:style-name="T58">by His own example </text:span>that the chastisement must have an escalation to it. Therefore, using the same punishment for repeats of the same <text:span text:style-name="T58">error</text:span> <text:span text:style-name="T58">(or all errors) </text:span>will not lead to a favorable outcome.</text:p>
            </text:list-item>
            <text:list-item>
              <text:p text:style-name="P33"><text:span text:style-name="T59">Likewise, u</text:span>sing the same punishment for <text:span text:style-name="T60">all errors</text:span> will <text:span text:style-name="T61">never</text:span> lead to a favorable outcome.</text:p>
            </text:list-item>
          </text:list>
        </text:list-item>
      </text:list>
      <text:p text:style-name="P34"/>
      <table:table table:name="Table2" table:style-name="Table2">
        <table:table-column table:style-name="Table2.A"/>
        <table:table-column table:style-name="Table2.B"/>
        <table:table-row table:style-name="Table2.1">
          <table:table-cell table:style-name="Table2.A1" office:value-type="string">
            <text:p text:style-name="P35">Lev 26:18</text:p>
          </table:table-cell>
          <table:table-cell table:style-name="Table2.B1" office:value-type="string">
            <text:p text:style-name="P36">And if ye will not yet for all this hearken <text:span text:style-name="T62">unto me, then I will punish</text:span><text:span text:style-name="T63">H3256</text:span> you seven times more for your sins.</text:p>
          </table:table-cell>
        </table:table-row>
        <table:table-row table:style-name="Table2.1">
          <table:table-cell table:style-name="Table2.A2" office:value-type="string">
            <text:p text:style-name="P35">Lev 26:23</text:p>
          </table:table-cell>
          <table:table-cell table:style-name="Table2.B2" office:value-type="string">
            <text:p text:style-name="P36"><text:span text:style-name="T62">And if ye will not be reformed</text:span><text:span text:style-name="T63">H3256</text:span> by me by these things, but will walk contrary unto me;</text:p>
          </table:table-cell>
        </table:table-row>
        <table:table-row table:style-name="Table2.1">
          <table:table-cell table:style-name="Table2.A2" office:value-type="string">
            <text:p text:style-name="P35">Lev 26:28</text:p>
          </table:table-cell>
          <table:table-cell table:style-name="Table2.B2" office:value-type="string">
            <text:p text:style-name="P36">Then I will walk contrary unto you also in fury; and I, even <text:span text:style-name="T62">I, will chastise</text:span><text:span text:style-name="T63">H3256</text:span> you seven times for your sins.</text:p>
          </table:table-cell>
        </table:table-row>
        <table:table-row table:style-name="Table2.1">
          <table:table-cell table:style-name="Table2.A2" office:value-type="string">
            <text:p text:style-name="P35">Deu 4:36</text:p>
          </table:table-cell>
          <table:table-cell table:style-name="Table2.B2" office:value-type="string">
            <text:p text:style-name="P36">Out of heaven he made thee to hear his voice<text:span text:style-name="T62">, that he might instruct</text:span><text:span text:style-name="T63">H3256</text:span> thee: and upon earth he shewed thee his great fire; and thou heardest his words out of the midst of the fire.</text:p>
          </table:table-cell>
        </table:table-row>
        <table:table-row table:style-name="Table2.1">
          <table:table-cell table:style-name="Table2.A2" office:value-type="string">
            <text:p text:style-name="P35">Deu 8:5</text:p>
          </table:table-cell>
          <table:table-cell table:style-name="Table2.B2" office:value-type="string">
            <text:p text:style-name="P36">Thou shalt also consider in thine heart, that, as a man <text:span text:style-name="T62">chasteneth</text:span><text:span text:style-name="T63">H3256</text:span> his son, so the LORD thy God <text:span text:style-name="T62">chasteneth</text:span><text:span text:style-name="T63">H3256</text:span> thee.</text:p>
          </table:table-cell>
        </table:table-row>
        <table:table-row table:style-name="Table2.1">
          <table:table-cell table:style-name="Table2.A2" office:value-type="string">
            <text:p text:style-name="P35">Deu 21:18</text:p>
          </table:table-cell>
          <table:table-cell table:style-name="Table2.B2" office:value-type="string">
            <text:p text:style-name="P36">If a man have a stubborn and rebellious son, which will not obey the voice of his father, or the voice of his mother<text:span text:style-name="T62">, and that, when they have chastened</text:span><text:span text:style-name="T63">H3256</text:span> him, will not hearken unto them:</text:p>
          </table:table-cell>
        </table:table-row>
        <table:table-row table:style-name="Table2.1">
          <table:table-cell table:style-name="Table2.A2" office:value-type="string">
            <text:p text:style-name="P35">Deu 22:18</text:p>
          </table:table-cell>
          <table:table-cell table:style-name="Table2.B2" office:value-type="string">
            <text:p text:style-name="P36">And the elders of that city shall take that man <text:span text:style-name="T62">and chastise</text:span><text:span text:style-name="T63">H3256</text:span> him;</text:p>
          </table:table-cell>
        </table:table-row>
        <table:table-row table:style-name="Table2.1">
          <table:table-cell table:style-name="Table2.A2" office:value-type="string">
            <text:p text:style-name="P35">1Ki 12:11</text:p>
          </table:table-cell>
          <table:table-cell table:style-name="Table2.B2" office:value-type="string">
            <text:p text:style-name="P36">And now whereas my father did lade you with a heavy yoke, I will add to your yoke: my father <text:span text:style-name="T62">hath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Ki 12:14</text:p>
          </table:table-cell>
          <table:table-cell table:style-name="Table2.B2" office:value-type="string">
            <text:p text:style-name="P36">And spake to them after the counsel of the young men, saying, My father made your yoke heavy, and I will add to your yoke: my father <text:span text:style-name="T62">also chastised</text:span><text:span text:style-name="T63">H3256</text:span> you with whips<text:span text:style-name="T62">, but I will chastise</text:span><text:span text:style-name="T63">H3256</text:span> you with scorpions.</text:p>
          </table:table-cell>
        </table:table-row>
        <table:table-row table:style-name="Table2.1">
          <table:table-cell table:style-name="Table2.A2" office:value-type="string">
            <text:p text:style-name="P35">1Ch 15:22</text:p>
          </table:table-cell>
          <table:table-cell table:style-name="Table2.B2" office:value-type="string">
            <text:p text:style-name="P36">And Chenaniah, chief of the Levites, was for song<text:span text:style-name="T62">: he instructed</text:span><text:span text:style-name="T63">H3256</text:span> about the song, because he was skilful.</text:p>
          </table:table-cell>
        </table:table-row>
        <table:table-row table:style-name="Table2.1">
          <table:table-cell table:style-name="Table2.A2" office:value-type="string">
            <text:p text:style-name="P35">2Ch 10:11</text:p>
          </table:table-cell>
          <table:table-cell table:style-name="Table2.B2" office:value-type="string">
            <text:p text:style-name="P36">For whereas my father put a heavy yoke upon you, I will put more to your yoke: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2Ch 10:14</text:p>
          </table:table-cell>
          <table:table-cell table:style-name="Table2.B2" office:value-type="string">
            <text:p text:style-name="P36">And answered them after the advice of the young men, saying, My father made your yoke heavy, but I will add thereto: my father <text:span text:style-name="T62">chastised</text:span><text:span text:style-name="T63">H3256</text:span> you with whips, but I will chastise you with scorpions.</text:p>
          </table:table-cell>
        </table:table-row>
        <table:table-row table:style-name="Table2.1">
          <table:table-cell table:style-name="Table2.A2" office:value-type="string">
            <text:p text:style-name="P35">Job 4:3</text:p>
          </table:table-cell>
          <table:table-cell table:style-name="Table2.B2" office:value-type="string">
            <text:p text:style-name="P36"><text:span text:style-name="T62">Behold, thou hast instructed</text:span><text:span text:style-name="T63">H3256</text:span> many, and thou hast strengthened the weak hands.</text:p>
          </table:table-cell>
        </table:table-row>
        <text:soft-page-break/>
        <table:table-row table:style-name="Table2.1">
          <table:table-cell table:style-name="Table2.A2" office:value-type="string">
            <text:p text:style-name="P35">Psa 2:10</text:p>
          </table:table-cell>
          <table:table-cell table:style-name="Table2.B2" office:value-type="string">
            <text:p text:style-name="P36">Be wise now therefore, O ye kings<text:span text:style-name="T62">: be instructed</text:span><text:span text:style-name="T63">H3256</text:span>, ye judges of the earth.</text:p>
          </table:table-cell>
        </table:table-row>
        <table:table-row table:style-name="Table2.1">
          <table:table-cell table:style-name="Table2.A2" office:value-type="string">
            <text:p text:style-name="P35">Psa 6:1</text:p>
          </table:table-cell>
          <table:table-cell table:style-name="Table2.B2" office:value-type="string">
            <text:p text:style-name="P36">To the chief Musician on Neginoth upon Sheminith, A Psalm of David. O LORD, rebuke me not in thine anger<text:span text:style-name="T62">, neither chasten</text:span><text:span text:style-name="T63">H3256</text:span> me in thy hot displeasure.</text:p>
          </table:table-cell>
        </table:table-row>
        <table:table-row table:style-name="Table2.1">
          <table:table-cell table:style-name="Table2.A2" office:value-type="string">
            <text:p text:style-name="P35">Psa 16:7</text:p>
          </table:table-cell>
          <table:table-cell table:style-name="Table2.B2" office:value-type="string">
            <text:p text:style-name="P36">I will bless the LORD, who hath given me counsel: my reins <text:span text:style-name="T62">also instruct</text:span><text:span text:style-name="T63">H3256</text:span> me in the night seasons.</text:p>
          </table:table-cell>
        </table:table-row>
        <table:table-row table:style-name="Table2.1">
          <table:table-cell table:style-name="Table2.A2" office:value-type="string">
            <text:p text:style-name="P35">Psa 38:1</text:p>
          </table:table-cell>
          <table:table-cell table:style-name="Table2.B2" office:value-type="string">
            <text:p text:style-name="P36">A Psalm of David, to bring to remembrance. O LORD, rebuke me not in thy wrath<text:span text:style-name="T62">: neither chasten</text:span><text:span text:style-name="T63">H3256</text:span> me in thy hot displeasure.</text:p>
          </table:table-cell>
        </table:table-row>
        <table:table-row table:style-name="Table2.1">
          <table:table-cell table:style-name="Table2.A2" office:value-type="string">
            <text:p text:style-name="P35">Psa 39:11</text:p>
          </table:table-cell>
          <table:table-cell table:style-name="Table2.B2" office:value-type="string">
            <text:p text:style-name="P36">When thou with rebukes <text:span text:style-name="T62">dost correct</text:span><text:span text:style-name="T63">H3256</text:span> man for iniquity, thou makest his beauty to consume away like a moth: surely every man is vanity. Selah.</text:p>
          </table:table-cell>
        </table:table-row>
        <table:table-row table:style-name="Table2.1">
          <table:table-cell table:style-name="Table2.A2" office:value-type="string">
            <text:p text:style-name="P35">Psa 94:10</text:p>
          </table:table-cell>
          <table:table-cell table:style-name="Table2.B2" office:value-type="string">
            <text:p text:style-name="P36"><text:span text:style-name="T62">He that chastiseth</text:span><text:span text:style-name="T63">H3256</text:span> the heathen, shall not he correct? he that teacheth man knowledge, shall not he know?</text:p>
          </table:table-cell>
        </table:table-row>
        <table:table-row table:style-name="Table2.1">
          <table:table-cell table:style-name="Table2.A2" office:value-type="string">
            <text:p text:style-name="P35">Psa 94:12</text:p>
          </table:table-cell>
          <table:table-cell table:style-name="Table2.B2" office:value-type="string">
            <text:p text:style-name="P36">Blessed is the man <text:span text:style-name="T62">whom thou chastenest</text:span><text:span text:style-name="T63">H3256</text:span>, O LORD, and teachest him out of thy law;</text:p>
          </table:table-cell>
        </table:table-row>
        <table:table-row table:style-name="Table2.1">
          <table:table-cell table:style-name="Table2.A2" office:value-type="string">
            <text:p text:style-name="P35">Psa 118:18</text:p>
          </table:table-cell>
          <table:table-cell table:style-name="Table2.B2" office:value-type="string">
            <text:p text:style-name="P36">The LORD <text:span text:style-name="T62">hath chastened</text:span><text:span text:style-name="T63">H3256</text:span> <text:span text:style-name="T62">me sore</text:span><text:span text:style-name="T63">H3256</text:span>: but he hath not given me over unto death.</text:p>
          </table:table-cell>
        </table:table-row>
        <table:table-row table:style-name="Table2.1">
          <table:table-cell table:style-name="Table2.A2" office:value-type="string">
            <text:p text:style-name="P35">Pro 9:7</text:p>
          </table:table-cell>
          <table:table-cell table:style-name="Table2.B2" office:value-type="string">
            <text:p text:style-name="P36"><text:span text:style-name="T62">He that reproveth</text:span><text:span text:style-name="T63">H3256</text:span> a scorner getteth to himself shame: and he that rebuketh a wicked man getteth himself a blot.</text:p>
          </table:table-cell>
        </table:table-row>
        <table:table-row table:style-name="Table2.1">
          <table:table-cell table:style-name="Table2.A2" office:value-type="string">
            <text:p text:style-name="P35">Pro 19:18</text:p>
          </table:table-cell>
          <table:table-cell table:style-name="Table2.B2" office:value-type="string">
            <text:p text:style-name="P36"><text:span text:style-name="T62">Chasten</text:span><text:span text:style-name="T63">H3256</text:span> thy son while there is hope, and let not thy soul spare for his crying.</text:p>
          </table:table-cell>
        </table:table-row>
        <table:table-row table:style-name="Table2.1">
          <table:table-cell table:style-name="Table2.A2" office:value-type="string">
            <text:p text:style-name="P35">Pro 29:17</text:p>
          </table:table-cell>
          <table:table-cell table:style-name="Table2.B2" office:value-type="string">
            <text:p text:style-name="P36"><text:span text:style-name="T62">Correct</text:span><text:span text:style-name="T63">H3256</text:span> thy son, and he shall give thee rest; yea, he shall give delight unto thy soul.</text:p>
          </table:table-cell>
        </table:table-row>
        <table:table-row table:style-name="Table2.1">
          <table:table-cell table:style-name="Table2.A2" office:value-type="string">
            <text:p text:style-name="P35">Pro 29:19</text:p>
          </table:table-cell>
          <table:table-cell table:style-name="Table2.B2" office:value-type="string">
            <text:p text:style-name="P36">A servant <text:span text:style-name="T62">will not be corrected</text:span><text:span text:style-name="T63">H3256</text:span> by words: for though he understand he will not answer.</text:p>
          </table:table-cell>
        </table:table-row>
        <table:table-row table:style-name="Table2.1">
          <table:table-cell table:style-name="Table2.A2" office:value-type="string">
            <text:p text:style-name="P35">Pro 31:1</text:p>
          </table:table-cell>
          <table:table-cell table:style-name="Table2.B2" office:value-type="string">
            <text:p text:style-name="P36">The words of king Lemuel, the prophecy that his mother <text:span text:style-name="T62">taught</text:span><text:span text:style-name="T63">H3256</text:span> him.</text:p>
          </table:table-cell>
        </table:table-row>
        <table:table-row table:style-name="Table2.1">
          <table:table-cell table:style-name="Table2.A2" office:value-type="string">
            <text:p text:style-name="P35">Isa 8:11</text:p>
          </table:table-cell>
          <table:table-cell table:style-name="Table2.B2" office:value-type="string">
            <text:p text:style-name="P36">For the LORD spake thus to me with a strong hand<text:span text:style-name="T62">, and instructed</text:span><text:span text:style-name="T63">H3256</text:span> me that I should not walk in the way of this people, saying,</text:p>
          </table:table-cell>
        </table:table-row>
        <table:table-row table:style-name="Table2.1">
          <table:table-cell table:style-name="Table2.A2" office:value-type="string">
            <text:p text:style-name="P35">Isa 28:26</text:p>
          </table:table-cell>
          <table:table-cell table:style-name="Table2.B2" office:value-type="string">
            <text:p text:style-name="P36">For his God <text:span text:style-name="T62">doth instruct</text:span><text:span text:style-name="T63">H3256</text:span> him to discretion, and doth teach him.</text:p>
          </table:table-cell>
        </table:table-row>
        <table:table-row table:style-name="Table2.1">
          <table:table-cell table:style-name="Table2.A2" office:value-type="string">
            <text:p text:style-name="P35">Jer 2:19</text:p>
          </table:table-cell>
          <table:table-cell table:style-name="Table2.B2" office:value-type="string">
            <text:p text:style-name="P36">Thine own wickedness <text:span text:style-name="T62">shall correct</text:span><text:span text:style-name="T63">H3256</text:span> thee, and thy backslidings shall reprove thee: know therefore and see that it is an evil thing and bitter, that thou hast forsaken the LORD thy God, and that my fear is not in thee, saith the Lord GOD of hosts.</text:p>
          </table:table-cell>
        </table:table-row>
        <table:table-row table:style-name="Table2.1">
          <table:table-cell table:style-name="Table2.A2" office:value-type="string">
            <text:p text:style-name="P35">Jer 6:8</text:p>
          </table:table-cell>
          <table:table-cell table:style-name="Table2.B2" office:value-type="string">
            <text:p text:style-name="P36"><text:span text:style-name="T62">Be thou instructed</text:span><text:span text:style-name="T63">H3256</text:span>, O Jerusalem, lest my soul depart from thee; lest I make thee desolate, a land not inhabited.</text:p>
          </table:table-cell>
        </table:table-row>
        <table:table-row table:style-name="Table2.1">
          <table:table-cell table:style-name="Table2.A2" office:value-type="string">
            <text:p text:style-name="P35">Jer 10:24</text:p>
          </table:table-cell>
          <table:table-cell table:style-name="Table2.B2" office:value-type="string">
            <text:p text:style-name="P36">O LORD<text:span text:style-name="T62">, correct</text:span><text:span text:style-name="T63">H3256</text:span> me, but with judgment; not in thine anger, lest thou bring me to nothing.</text:p>
          </table:table-cell>
        </table:table-row>
        <table:table-row table:style-name="Table2.1">
          <table:table-cell table:style-name="Table2.A2" office:value-type="string">
            <text:p text:style-name="P35">Jer 30:11</text:p>
          </table:table-cell>
          <table:table-cell table:style-name="Table2.B2" office:value-type="string">
            <text:p text:style-name="P36">For I am with thee, saith the LORD, to save thee: though I make a full end of all nations whither I have scattered thee, yet will I not make a full end <text:span text:style-name="T62">of thee: but I will correct</text:span><text:span text:style-name="T63">H3256</text:span> thee in measure, and will not leave thee altogether unpunished.</text:p>
          </table:table-cell>
        </table:table-row>
        <text:soft-page-break/>
        <table:table-row table:style-name="Table2.1">
          <table:table-cell table:style-name="Table2.A2" office:value-type="string">
            <text:p text:style-name="P35">Jer 31:18</text:p>
          </table:table-cell>
          <table:table-cell table:style-name="Table2.B2" office:value-type="string">
            <text:p text:style-name="P36">I have surely heard Ephraim bemoaning <text:span text:style-name="T62">himself thus; Thou hast chastised</text:span><text:span text:style-name="T63">H3256</text:span> <text:span text:style-name="T62">me, and I was chastised</text:span><text:span text:style-name="T63">H3256</text:span>, as a bullock unaccustomed to the yoke: turn thou me, and I shall be turned; for thou art the LORD my God.</text:p>
          </table:table-cell>
        </table:table-row>
        <table:table-row table:style-name="Table2.1">
          <table:table-cell table:style-name="Table2.A2" office:value-type="string">
            <text:p text:style-name="P35">Jer 46:28</text:p>
          </table:table-cell>
          <table:table-cell table:style-name="Table2.B2" office:value-type="string">
            <text:p text:style-name="P36">Fear thou not, O Jacob my servant, saith the LORD: for I am with thee; for I will make a full end of all the nations whither I have driven thee: but I will not make a full end <text:span text:style-name="T62">of thee, but correct</text:span><text:span text:style-name="T63">H3256</text:span> thee in measure; yet will I not leave thee wholly unpunished.</text:p>
          </table:table-cell>
        </table:table-row>
        <table:table-row table:style-name="Table2.1">
          <table:table-cell table:style-name="Table2.A2" office:value-type="string">
            <text:p text:style-name="P35">Eze 23:48</text:p>
          </table:table-cell>
          <table:table-cell table:style-name="Table2.B2" office:value-type="string">
            <text:p text:style-name="P36">Thus will I cause lewdness to cease out of the land, that all women <text:span text:style-name="T62">may be taught</text:span><text:span text:style-name="T63">H3256</text:span> not to do after your lewdness.</text:p>
          </table:table-cell>
        </table:table-row>
        <table:table-row table:style-name="Table2.1">
          <table:table-cell table:style-name="Table2.A2" office:value-type="string">
            <text:p text:style-name="P35">Hos 7:12</text:p>
          </table:table-cell>
          <table:table-cell table:style-name="Table2.B2" office:value-type="string">
            <text:p text:style-name="P36">When they shall go, I will spread my net upon them; I will bring them down as the fowls of the heaven<text:span text:style-name="T62">; I will chastise</text:span><text:span text:style-name="T63">H3256</text:span> them, as their congregation hath heard.</text:p>
          </table:table-cell>
        </table:table-row>
        <table:table-row table:style-name="Table2.1">
          <table:table-cell table:style-name="Table2.A2" office:value-type="string">
            <text:p text:style-name="P35">Hos 7:15</text:p>
          </table:table-cell>
          <table:table-cell table:style-name="Table2.B2" office:value-type="string">
            <text:p text:style-name="P36"><text:span text:style-name="T62">Though I have bound</text:span><text:span text:style-name="T63">H3256</text:span> and strengthened their arms, yet do they imagine mischief against me.</text:p>
          </table:table-cell>
        </table:table-row>
        <table:table-row table:style-name="Table2.1">
          <table:table-cell table:style-name="Table2.A2" office:value-type="string">
            <text:p text:style-name="P35">Hos 10:10</text:p>
          </table:table-cell>
          <table:table-cell table:style-name="Table2.B2" office:value-type="string">
            <text:p text:style-name="P36">It is in my desire <text:span text:style-name="T62">that I should chastise</text:span><text:span text:style-name="T63">H3256</text:span> them; and the people shall be gathered against them, when they shall bind themselves in their two furrow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text-align="center" style:justify-single-word="false"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10:43:16.389501658</meta:creation-date>
    <dc:title>default</dc:title>
    <meta:editing-duration>PT1H31M32S</meta:editing-duration>
    <meta:editing-cycles>92</meta:editing-cycles>
    <meta:generator>LibreOffice/26.2.4.2$Linux_X86_64 LibreOffice_project/64a984c51f4702dbd3710b13428c673a2f1292e7</meta:generator>
    <dc:date>2026-07-11T12:20:40.894070919</dc:date>
    <meta:print-date>2025-09-27T14:10:23.815674400</meta:print-date>
    <meta:printed-by>PDF files: William K. McDannell Jr.</meta:printed-by>
    <meta:document-statistic meta:table-count="2" meta:image-count="0" meta:object-count="0" meta:page-count="4" meta:paragraph-count="116" meta:word-count="1544" meta:character-count="8360" meta:non-whitespace-character-count="6958"/>
    <meta:template xlink:type="simple" xlink:actuate="onRequest" xlink:title="default" xlink:href="../../../../../Templates/default1.ott" meta:date="2025-09-27T10:43:15.755025425"/>
  </office:meta>
</office:document-meta>
</file>