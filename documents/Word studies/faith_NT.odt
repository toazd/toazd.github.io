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014in" fo:margin-left="0in" table:align="left"/>
    </style:style>
    <style:style style:name="Table1.A" style:family="table-column">
      <style:table-column-properties style:column-width="0.8785in"/>
    </style:style>
    <style:style style:name="Table1.B" style:family="table-column">
      <style:table-column-properties style:column-width="7.0229in"/>
    </style:style>
    <style:style style:name="Table1.1" style:family="table-row">
      <style:table-row-properties fo:background-color="#efefd8" fo:keep-together="always">
        <style:background-image/>
      </style:table-row-properties>
    </style:style>
    <style:style style:name="Table1.A1" style:family="table-cell">
      <style:table-cell-properties style:vertical-align="middle" fo:padding="0.0201in" fo:border-left="0.75pt solid #000000" fo:border-right="none" fo:border-top="0.75pt solid #000000" fo:border-bottom="0.75pt solid #000000"/>
    </style:style>
    <style:style style:name="Table1.B1" style:family="table-cell">
      <style:table-cell-properties style:vertical-align="middle" fo:padding="0.0201in" fo:border="0.75pt solid #000000"/>
    </style:style>
    <style:style style:name="Table1.2" style:family="table-row">
      <style:table-row-properties fo:keep-together="always"/>
    </style:style>
    <style:style style:name="Table1.A2" style:family="table-cell">
      <style:table-cell-properties style:vertical-align="middle" fo:padding="0.0201in" fo:border-left="0.75pt solid #000000" fo:border-right="none" fo:border-top="none" fo:border-bottom="0.75pt solid #000000"/>
    </style:style>
    <style:style style:name="Table1.B2" style:family="table-cell">
      <style:table-cell-properties style:vertical-align="middle" fo:padding="0.0201in" fo:border-left="0.75pt solid #000000" fo:border-right="0.75pt solid #000000" fo:border-top="none" fo:border-bottom="0.75pt solid #000000"/>
    </style:style>
    <style:style style:name="Table1.4" style:family="table-row">
      <style:table-row-properties fo:keep-together="always"/>
    </style:style>
    <style:style style:name="Table2" style:family="table">
      <style:table-properties style:width="7.9014in" fo:margin-left="0in" table:align="left"/>
    </style:style>
    <style:style style:name="Table2.A" style:family="table-column">
      <style:table-column-properties style:column-width="0.9014in"/>
    </style:style>
    <style:style style:name="Table2.B" style:family="table-column">
      <style:table-column-properties style:column-width="7in"/>
    </style:style>
    <style:style style:name="Table2.1" style:family="table-row">
      <style:table-row-properties fo:background-color="#efefd8" fo:keep-together="always">
        <style:background-image/>
      </style:table-row-properties>
    </style:style>
    <style:style style:name="Table2.A1" style:family="table-cell">
      <style:table-cell-properties style:vertical-align="middle" fo:padding="0.0201in" fo:border-left="0.75pt solid #000000" fo:border-right="none" fo:border-top="0.75pt solid #000000" fo:border-bottom="0.75pt solid #000000"/>
    </style:style>
    <style:style style:name="Table2.B1" style:family="table-cell">
      <style:table-cell-properties style:vertical-align="middle" fo:padding="0.0201in" fo:border="0.75pt solid #000000"/>
    </style:style>
    <style:style style:name="Table2.2" style:family="table-row">
      <style:table-row-properties fo:keep-together="always"/>
    </style:style>
    <style:style style:name="Table2.A2" style:family="table-cell">
      <style:table-cell-properties style:vertical-align="middle" fo:padding="0.0201in" fo:border-left="0.75pt solid #000000" fo:border-right="none" fo:border-top="none" fo:border-bottom="0.75pt solid #000000"/>
    </style:style>
    <style:style style:name="Table2.B2" style:family="table-cell">
      <style:table-cell-properties style:vertical-align="middle" fo:padding="0.0201in" fo:border-left="0.75pt solid #000000" fo:border-right="0.75pt solid #000000" fo:border-top="none" fo:border-bottom="0.75pt solid #000000"/>
    </style:style>
    <style:style style:name="Table2.4" style:family="table-row">
      <style:table-row-properties fo:keep-together="always"/>
    </style:style>
    <style:style style:name="Table2.6" style:family="table-row">
      <style:table-row-properties fo:keep-together="always"/>
    </style:style>
    <style:style style:name="Table2.8" style:family="table-row">
      <style:table-row-properties fo:keep-together="always"/>
    </style:style>
    <style:style style:name="Table2.10" style:family="table-row">
      <style:table-row-properties fo:keep-together="always"/>
    </style:style>
    <style:style style:name="Table2.12" style:family="table-row">
      <style:table-row-properties fo:keep-together="always"/>
    </style:style>
    <style:style style:name="Table2.14" style:family="table-row">
      <style:table-row-properties fo:keep-together="always"/>
    </style:style>
    <style:style style:name="Table2.16" style:family="table-row">
      <style:table-row-properties fo:keep-together="always"/>
    </style:style>
    <style:style style:name="Table2.18" style:family="table-row">
      <style:table-row-properties fo:keep-together="always"/>
    </style:style>
    <style:style style:name="Table2.20" style:family="table-row">
      <style:table-row-properties fo:keep-together="always"/>
    </style:style>
    <style:style style:name="Table2.22" style:family="table-row">
      <style:table-row-properties fo:keep-together="always"/>
    </style:style>
    <style:style style:name="Table2.24" style:family="table-row">
      <style:table-row-properties fo:keep-together="always"/>
    </style:style>
    <style:style style:name="Table2.26" style:family="table-row">
      <style:table-row-properties fo:keep-together="always"/>
    </style:style>
    <style:style style:name="Table2.28" style:family="table-row">
      <style:table-row-properties fo:keep-together="always"/>
    </style:style>
    <style:style style:name="Table2.30" style:family="table-row">
      <style:table-row-properties fo:keep-together="always"/>
    </style:style>
    <style:style style:name="Table2.32" style:family="table-row">
      <style:table-row-properties fo:keep-together="always"/>
    </style:style>
    <style:style style:name="Table2.34" style:family="table-row">
      <style:table-row-properties fo:keep-together="always"/>
    </style:style>
    <style:style style:name="Table2.36" style:family="table-row">
      <style:table-row-properties fo:keep-together="always"/>
    </style:style>
    <style:style style:name="Table2.38" style:family="table-row">
      <style:table-row-properties fo:keep-together="always"/>
    </style:style>
    <style:style style:name="Table2.40" style:family="table-row">
      <style:table-row-properties fo:keep-together="always"/>
    </style:style>
    <style:style style:name="Table2.42" style:family="table-row">
      <style:table-row-properties fo:keep-together="always"/>
    </style:style>
    <style:style style:name="Table2.44" style:family="table-row">
      <style:table-row-properties fo:keep-together="always"/>
    </style:style>
    <style:style style:name="Table2.46" style:family="table-row">
      <style:table-row-properties fo:keep-together="always"/>
    </style:style>
    <style:style style:name="Table2.48" style:family="table-row">
      <style:table-row-properties fo:keep-together="always"/>
    </style:style>
    <style:style style:name="Table2.50" style:family="table-row">
      <style:table-row-properties fo:keep-together="always"/>
    </style:style>
    <style:style style:name="Table2.52" style:family="table-row">
      <style:table-row-properties fo:keep-together="always"/>
    </style:style>
    <style:style style:name="Table2.54" style:family="table-row">
      <style:table-row-properties fo:keep-together="always"/>
    </style:style>
    <style:style style:name="Table2.56" style:family="table-row">
      <style:table-row-properties fo:keep-together="always"/>
    </style:style>
    <style:style style:name="Table2.58" style:family="table-row">
      <style:table-row-properties fo:keep-together="always"/>
    </style:style>
    <style:style style:name="Table2.60" style:family="table-row">
      <style:table-row-properties fo:keep-together="always"/>
    </style:style>
    <style:style style:name="Table2.62" style:family="table-row">
      <style:table-row-properties fo:keep-together="always"/>
    </style:style>
    <style:style style:name="Table2.64" style:family="table-row">
      <style:table-row-properties fo:keep-together="always"/>
    </style:style>
    <style:style style:name="Table2.66" style:family="table-row">
      <style:table-row-properties fo:keep-together="always"/>
    </style:style>
    <style:style style:name="Table2.68" style:family="table-row">
      <style:table-row-properties fo:keep-together="always"/>
    </style:style>
    <style:style style:name="Table2.70" style:family="table-row">
      <style:table-row-properties fo:keep-together="always"/>
    </style:style>
    <style:style style:name="Table2.72" style:family="table-row">
      <style:table-row-properties fo:keep-together="always"/>
    </style:style>
    <style:style style:name="Table2.74" style:family="table-row">
      <style:table-row-properties fo:keep-together="always"/>
    </style:style>
    <style:style style:name="Table2.76" style:family="table-row">
      <style:table-row-properties fo:keep-together="always"/>
    </style:style>
    <style:style style:name="Table2.78" style:family="table-row">
      <style:table-row-properties fo:keep-together="always"/>
    </style:style>
    <style:style style:name="Table2.80" style:family="table-row">
      <style:table-row-properties fo:keep-together="always"/>
    </style:style>
    <style:style style:name="Table2.82" style:family="table-row">
      <style:table-row-properties fo:keep-together="always"/>
    </style:style>
    <style:style style:name="Table2.84" style:family="table-row">
      <style:table-row-properties fo:keep-together="always"/>
    </style:style>
    <style:style style:name="Table2.86" style:family="table-row">
      <style:table-row-properties fo:keep-together="always"/>
    </style:style>
    <style:style style:name="Table2.88" style:family="table-row">
      <style:table-row-properties fo:keep-together="always"/>
    </style:style>
    <style:style style:name="Table2.90" style:family="table-row">
      <style:table-row-properties fo:keep-together="always"/>
    </style:style>
    <style:style style:name="Table2.92" style:family="table-row">
      <style:table-row-properties fo:keep-together="always"/>
    </style:style>
    <style:style style:name="Table2.94" style:family="table-row">
      <style:table-row-properties fo:keep-together="always"/>
    </style:style>
    <style:style style:name="Table2.96" style:family="table-row">
      <style:table-row-properties fo:keep-together="always"/>
    </style:style>
    <style:style style:name="Table2.98" style:family="table-row">
      <style:table-row-properties fo:keep-together="always"/>
    </style:style>
    <style:style style:name="Table2.100" style:family="table-row">
      <style:table-row-properties fo:keep-together="always"/>
    </style:style>
    <style:style style:name="Table2.102" style:family="table-row">
      <style:table-row-properties fo:keep-together="always"/>
    </style:style>
    <style:style style:name="Table2.104" style:family="table-row">
      <style:table-row-properties fo:keep-together="always"/>
    </style:style>
    <style:style style:name="Table2.106" style:family="table-row">
      <style:table-row-properties fo:keep-together="always"/>
    </style:style>
    <style:style style:name="Table2.108" style:family="table-row">
      <style:table-row-properties fo:keep-together="always"/>
    </style:style>
    <style:style style:name="Table2.110" style:family="table-row">
      <style:table-row-properties fo:keep-together="always"/>
    </style:style>
    <style:style style:name="Table2.112" style:family="table-row">
      <style:table-row-properties fo:keep-together="always"/>
    </style:style>
    <style:style style:name="Table2.114" style:family="table-row">
      <style:table-row-properties fo:keep-together="always"/>
    </style:style>
    <style:style style:name="Table2.116" style:family="table-row">
      <style:table-row-properties fo:keep-together="always"/>
    </style:style>
    <style:style style:name="Table2.118" style:family="table-row">
      <style:table-row-properties fo:keep-together="always"/>
    </style:style>
    <style:style style:name="Table2.120" style:family="table-row">
      <style:table-row-properties fo:keep-together="always"/>
    </style:style>
    <style:style style:name="Table2.122" style:family="table-row">
      <style:table-row-properties fo:keep-together="always"/>
    </style:style>
    <style:style style:name="Table2.124" style:family="table-row">
      <style:table-row-properties fo:keep-together="always"/>
    </style:style>
    <style:style style:name="Table2.126" style:family="table-row">
      <style:table-row-properties fo:keep-together="always"/>
    </style:style>
    <style:style style:name="Table2.128" style:family="table-row">
      <style:table-row-properties fo:keep-together="always"/>
    </style:style>
    <style:style style:name="Table2.130" style:family="table-row">
      <style:table-row-properties fo:keep-together="always"/>
    </style:style>
    <style:style style:name="Table2.132" style:family="table-row">
      <style:table-row-properties fo:keep-together="always"/>
    </style:style>
    <style:style style:name="Table2.134" style:family="table-row">
      <style:table-row-properties fo:keep-together="always"/>
    </style:style>
    <style:style style:name="Table2.136" style:family="table-row">
      <style:table-row-properties fo:keep-together="always"/>
    </style:style>
    <style:style style:name="Table2.138" style:family="table-row">
      <style:table-row-properties fo:keep-together="always"/>
    </style:style>
    <style:style style:name="Table2.140" style:family="table-row">
      <style:table-row-properties fo:keep-together="always"/>
    </style:style>
    <style:style style:name="Table2.142" style:family="table-row">
      <style:table-row-properties fo:keep-together="always"/>
    </style:style>
    <style:style style:name="Table2.144" style:family="table-row">
      <style:table-row-properties fo:keep-together="always"/>
    </style:style>
    <style:style style:name="Table2.146" style:family="table-row">
      <style:table-row-properties fo:keep-together="always"/>
    </style:style>
    <style:style style:name="Table2.148" style:family="table-row">
      <style:table-row-properties fo:keep-together="always"/>
    </style:style>
    <style:style style:name="Table2.150" style:family="table-row">
      <style:table-row-properties fo:keep-together="always"/>
    </style:style>
    <style:style style:name="Table2.152" style:family="table-row">
      <style:table-row-properties fo:keep-together="always"/>
    </style:style>
    <style:style style:name="Table2.154" style:family="table-row">
      <style:table-row-properties fo:keep-together="always"/>
    </style:style>
    <style:style style:name="Table2.156" style:family="table-row">
      <style:table-row-properties fo:keep-together="always"/>
    </style:style>
    <style:style style:name="Table2.158" style:family="table-row">
      <style:table-row-properties fo:keep-together="always"/>
    </style:style>
    <style:style style:name="Table2.160" style:family="table-row">
      <style:table-row-properties fo:keep-together="always"/>
    </style:style>
    <style:style style:name="Table2.162" style:family="table-row">
      <style:table-row-properties fo:keep-together="always"/>
    </style:style>
    <style:style style:name="Table2.164" style:family="table-row">
      <style:table-row-properties fo:keep-together="always"/>
    </style:style>
    <style:style style:name="Table2.166" style:family="table-row">
      <style:table-row-properties fo:keep-together="always"/>
    </style:style>
    <style:style style:name="Table2.168" style:family="table-row">
      <style:table-row-properties fo:keep-together="always"/>
    </style:style>
    <style:style style:name="Table2.170" style:family="table-row">
      <style:table-row-properties fo:keep-together="always"/>
    </style:style>
    <style:style style:name="Table2.172" style:family="table-row">
      <style:table-row-properties fo:keep-together="always"/>
    </style:style>
    <style:style style:name="Table2.174" style:family="table-row">
      <style:table-row-properties fo:keep-together="always"/>
    </style:style>
    <style:style style:name="Table2.176" style:family="table-row">
      <style:table-row-properties fo:keep-together="always"/>
    </style:style>
    <style:style style:name="Table2.178" style:family="table-row">
      <style:table-row-properties fo:keep-together="always"/>
    </style:style>
    <style:style style:name="Table2.180" style:family="table-row">
      <style:table-row-properties fo:keep-together="always"/>
    </style:style>
    <style:style style:name="Table2.182" style:family="table-row">
      <style:table-row-properties fo:keep-together="always"/>
    </style:style>
    <style:style style:name="Table2.184" style:family="table-row">
      <style:table-row-properties fo:keep-together="always"/>
    </style:style>
    <style:style style:name="Table2.186" style:family="table-row">
      <style:table-row-properties fo:keep-together="always"/>
    </style:style>
    <style:style style:name="Table2.188" style:family="table-row">
      <style:table-row-properties fo:keep-together="always"/>
    </style:style>
    <style:style style:name="Table2.190" style:family="table-row">
      <style:table-row-properties fo:keep-together="always"/>
    </style:style>
    <style:style style:name="Table2.192" style:family="table-row">
      <style:table-row-properties fo:keep-together="always"/>
    </style:style>
    <style:style style:name="Table2.194" style:family="table-row">
      <style:table-row-properties fo:keep-together="always"/>
    </style:style>
    <style:style style:name="Table2.196" style:family="table-row">
      <style:table-row-properties fo:keep-together="always"/>
    </style:style>
    <style:style style:name="Table2.198" style:family="table-row">
      <style:table-row-properties fo:keep-together="always"/>
    </style:style>
    <style:style style:name="Table2.200" style:family="table-row">
      <style:table-row-properties fo:keep-together="always"/>
    </style:style>
    <style:style style:name="Table2.202" style:family="table-row">
      <style:table-row-properties fo:keep-together="always"/>
    </style:style>
    <style:style style:name="Table2.204" style:family="table-row">
      <style:table-row-properties fo:keep-together="always"/>
    </style:style>
    <style:style style:name="Table2.206" style:family="table-row">
      <style:table-row-properties fo:keep-together="always"/>
    </style:style>
    <style:style style:name="Table2.208" style:family="table-row">
      <style:table-row-properties fo:keep-together="always"/>
    </style:style>
    <style:style style:name="Table2.210" style:family="table-row">
      <style:table-row-properties fo:keep-together="always"/>
    </style:style>
    <style:style style:name="Table2.212" style:family="table-row">
      <style:table-row-properties fo:keep-together="always"/>
    </style:style>
    <style:style style:name="Table2.214" style:family="table-row">
      <style:table-row-properties fo:keep-together="always"/>
    </style:style>
    <style:style style:name="Table2.216" style:family="table-row">
      <style:table-row-properties fo:keep-together="always"/>
    </style:style>
    <style:style style:name="Table2.218" style:family="table-row">
      <style:table-row-properties fo:keep-together="always"/>
    </style:style>
    <style:style style:name="Table2.220" style:family="table-row">
      <style:table-row-properties fo:keep-together="always"/>
    </style:style>
    <style:style style:name="Table2.222" style:family="table-row">
      <style:table-row-properties fo:keep-together="always"/>
    </style:style>
    <style:style style:name="Table2.224" style:family="table-row">
      <style:table-row-properties fo:keep-together="always"/>
    </style:style>
    <style:style style:name="Table2.226" style:family="table-row">
      <style:table-row-properties fo:keep-together="always"/>
    </style:style>
    <style:style style:name="Table2.228" style:family="table-row">
      <style:table-row-properties fo:keep-together="always"/>
    </style:style>
    <style:style style:name="Table3" style:family="table">
      <style:table-properties style:width="7.9014in" fo:margin-left="0in" table:align="left" table:border-model="separating"/>
    </style:style>
    <style:style style:name="Table3.A" style:family="table-column">
      <style:table-column-properties style:column-width="0.9014in"/>
    </style:style>
    <style:style style:name="Table3.B" style:family="table-column">
      <style:table-column-properties style:column-width="7in"/>
    </style:style>
    <style:style style:name="Table3.1" style:family="table-row">
      <style:table-row-properties fo:background-color="#efefd8" fo:keep-together="always">
        <style:background-image/>
      </style:table-row-properties>
    </style:style>
    <style:style style:name="Table3.A1" style:family="table-cell">
      <style:table-cell-properties style:vertical-align="middle" fo:padding="0.0201in" fo:border-left="0.75pt solid #000000" fo:border-right="none" fo:border-top="0.75pt solid #000000" fo:border-bottom="0.75pt solid #000000"/>
    </style:style>
    <style:style style:name="Table3.B1" style:family="table-cell">
      <style:table-cell-properties style:vertical-align="middle" fo:padding="0.0201in" fo:border="0.75pt solid #000000"/>
    </style:style>
    <style:style style:name="Table3.2" style:family="table-row">
      <style:table-row-properties fo:keep-together="always"/>
    </style:style>
    <style:style style:name="Table3.A2" style:family="table-cell">
      <style:table-cell-properties style:vertical-align="middle" fo:padding="0.0201in" fo:border-left="0.75pt solid #000000" fo:border-right="none" fo:border-top="none" fo:border-bottom="0.75pt solid #000000"/>
    </style:style>
    <style:style style:name="Table3.B2" style:family="table-cell">
      <style:table-cell-properties style:vertical-align="middle" fo:padding="0.0201in" fo:border-left="0.75pt solid #000000" fo:border-right="0.75pt solid #000000" fo:border-top="none" fo:border-bottom="0.75pt solid #000000"/>
    </style:style>
    <style:style style:name="Table3.4" style:family="table-row">
      <style:table-row-properties fo:keep-together="always"/>
    </style:style>
    <style:style style:name="Table3.6" style:family="table-row">
      <style:table-row-properties fo:keep-together="always"/>
    </style:style>
    <style:style style:name="Table3.8" style:family="table-row">
      <style:table-row-properties fo:keep-together="always"/>
    </style:style>
    <style:style style:name="Table3.10" style:family="table-row">
      <style:table-row-properties fo:keep-together="always"/>
    </style:style>
    <style:style style:name="Table3.12" style:family="table-row">
      <style:table-row-properties fo:keep-together="always"/>
    </style:style>
    <style:style style:name="Table3.14" style:family="table-row">
      <style:table-row-properties fo:keep-together="always"/>
    </style:style>
    <style:style style:name="Table3.16" style:family="table-row">
      <style:table-row-properties fo:keep-together="always"/>
    </style:style>
    <style:style style:name="Table3.18" style:family="table-row">
      <style:table-row-properties fo:keep-together="always"/>
    </style:style>
    <style:style style:name="Table3.20" style:family="table-row">
      <style:table-row-properties fo:keep-together="always"/>
    </style:style>
    <style:style style:name="Table3.22" style:family="table-row">
      <style:table-row-properties fo:keep-together="always"/>
    </style:style>
    <style:style style:name="Table3.24" style:family="table-row">
      <style:table-row-properties fo:keep-together="always"/>
    </style:style>
    <style:style style:name="Table3.26" style:family="table-row">
      <style:table-row-properties fo:keep-together="always"/>
    </style:style>
    <style:style style:name="Table3.28" style:family="table-row">
      <style:table-row-properties fo:keep-together="always"/>
    </style:style>
    <style:style style:name="Table3.30" style:family="table-row">
      <style:table-row-properties fo:keep-together="always"/>
    </style:style>
    <style:style style:name="Table3.32" style:family="table-row">
      <style:table-row-properties fo:keep-together="always"/>
    </style:style>
    <style:style style:name="Table3.34" style:family="table-row">
      <style:table-row-properties fo:keep-together="always"/>
    </style:style>
    <style:style style:name="Table3.36" style:family="table-row">
      <style:table-row-properties fo:keep-together="always"/>
    </style:style>
    <style:style style:name="Table3.38" style:family="table-row">
      <style:table-row-properties fo:keep-together="always"/>
    </style:style>
    <style:style style:name="Table3.40" style:family="table-row">
      <style:table-row-properties fo:keep-together="always"/>
    </style:style>
    <style:style style:name="Table3.42" style:family="table-row">
      <style:table-row-properties fo:keep-together="always"/>
    </style:style>
    <style:style style:name="Table3.44" style:family="table-row">
      <style:table-row-properties fo:keep-together="always"/>
    </style:style>
    <style:style style:name="Table3.46" style:family="table-row">
      <style:table-row-properties fo:keep-together="always"/>
    </style:style>
    <style:style style:name="Table3.48" style:family="table-row">
      <style:table-row-properties fo:keep-together="always"/>
    </style:style>
    <style:style style:name="P1" style:family="paragraph" style:parent-style-name="Table_20_Contents">
      <style:text-properties officeooo:rsid="001a0459" officeooo:paragraph-rsid="001a0459"/>
    </style:style>
    <style:style style:name="P2" style:family="paragraph" style:parent-style-name="Table_20_Contents">
      <style:text-properties officeooo:rsid="001daf5e" officeooo:paragraph-rsid="001daf5e"/>
    </style:style>
    <style:style style:name="P3" style:family="paragraph" style:parent-style-name="Table_20_Contents">
      <style:paragraph-properties fo:margin-left="0in" fo:margin-right="0in" fo:text-indent="0in" style:auto-text-indent="false"/>
    </style:style>
    <style:style style:name="P4" style:family="paragraph" style:parent-style-name="Table_20_Contents">
      <style:text-properties officeooo:rsid="001e3425" officeooo:paragraph-rsid="001e3425"/>
    </style:style>
    <style:style style:name="P5" style:family="paragraph" style:parent-style-name="Table_20_Contents">
      <style:text-properties officeooo:rsid="0020a2da" officeooo:paragraph-rsid="0020a2da"/>
    </style:style>
    <style:style style:name="P6" style:family="paragraph" style:parent-style-name="Table_20_Contents">
      <style:text-properties officeooo:rsid="0021f620" officeooo:paragraph-rsid="0021f620"/>
    </style:style>
    <style:style style:name="T1" style:family="text">
      <style:text-properties fo:color="#ff0000" loext:opacity="100%"/>
    </style:style>
    <style:style style:name="T2" style:family="text">
      <style:text-properties fo:font-style="italic"/>
    </style:style>
    <style:style style:name="T3" style:family="text">
      <style:text-properties fo:color="#ff0000" loext:opacity="100%" fo:font-weight="bold" fo:background-color="#bdffbd" loext:char-shading-value="0"/>
    </style:style>
    <style:style style:name="T4" style:family="text">
      <style:text-properties officeooo:rsid="001fe6e7"/>
    </style:style>
    <style:style style:name="T5" style:family="text">
      <style:text-properties officeooo:rsid="00207951"/>
    </style:style>
    <style:style style:name="T6" style:family="text">
      <style:text-properties fo:color="#000080" loext:opacity="100%"/>
    </style:style>
    <style:style style:name="T7" style:family="text">
      <style:text-properties fo:color="#336666" loext:opacity="100%"/>
    </style:style>
    <style:style style:name="T8" style:family="text">
      <style:text-properties fo:font-weight="bold" fo:background-color="#bdffbd" loext:char-shading-value="0"/>
    </style:style>
    <style:style style:name="T9" style:family="text">
      <style:text-properties fo:color="#a52a2a" loext:opacity="100%" style:text-position="33% 80%"/>
    </style:style>
    <style:style style:name="T10" style:family="text">
      <style:text-properties officeooo:rsid="00235a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able_20_Contents"/>
      <text:p text:style-name="Table_20_Contents"/>
      <text:p text:style-name="Table_20_Contents"/>
      <text:p text:style-name="P1">G3640: incredulous, ie. lacking confidence (in Christ)</text:p>
      <text:p text:style-name="P2">outline: o ye of little faith, thou of little faith</text:p>
      <text:p text:style-name="Table_20_Contents"/>
      <table:table table:name="Table1" table:style-name="Table1">
        <table:table-column table:style-name="Table1.A"/>
        <table:table-column table:style-name="Table1.B"/>
        <table:table-row table:style-name="Table1.1">
          <table:table-cell table:style-name="Table1.A1" office:value-type="string">
            <text:p text:style-name="Table_20_Contents">Mat 6:30</text:p>
          </table:table-cell>
          <table:table-cell table:style-name="Table1.B1" office:value-type="string">
            <text:p text:style-name="P3"><text:span text:style-name="T1">Wherefore, if God so clothe the grass of the field, which to day is, and to morrow is cast into the oven,</text:span> <text:span text:style-name="T2">shall he</text:span> <text:span text:style-name="T1">not much more</text:span> <text:span text:style-name="T2">clothe</text:span> <text:span text:style-name="T1">you, O ye of little faith[</text:span><text:span text:style-name="T3">G3640</text:span><text:span text:style-name="T1">]?</text:span> </text:p>
          </table:table-cell>
        </table:table-row>
        <table:table-row table:style-name="Table1.2">
          <table:table-cell table:style-name="Table1.A2" office:value-type="string">
            <text:p text:style-name="Table_20_Contents"><text:bookmark text:name="Mat"/>Mat 8:26 </text:p>
          </table:table-cell>
          <table:table-cell table:style-name="Table1.B2" office:value-type="string">
            <text:p text:style-name="P3">And he saith unto them, <text:span text:style-name="T1">Why are ye fearful, O ye of little faith[</text:span><text:span text:style-name="T3">G3640</text:span><text:span text:style-name="T1">]?</text:span> Then he arose, and rebuked the winds and the sea; and there was a great calm. </text:p>
          </table:table-cell>
        </table:table-row>
        <table:table-row table:style-name="Table1.1">
          <table:table-cell table:style-name="Table1.A2" office:value-type="string">
            <text:p text:style-name="Table_20_Contents"><text:bookmark text:name="Mat Copy 25"/>Mat 14:31 </text:p>
          </table:table-cell>
          <table:table-cell table:style-name="Table1.B2" office:value-type="string">
            <text:p text:style-name="P3">And immediately Jesus stretched forth <text:span text:style-name="T2">his</text:span> hand, and caught him, and said unto him, <text:span text:style-name="T1">O thou of little faith[</text:span><text:span text:style-name="T3">G3640</text:span><text:span text:style-name="T1">], wherefore didst thou doubt?</text:span> </text:p>
          </table:table-cell>
        </table:table-row>
        <table:table-row table:style-name="Table1.4">
          <table:table-cell table:style-name="Table1.A2" office:value-type="string">
            <text:p text:style-name="Table_20_Contents"><text:bookmark text:name="Mat Copy 26"/>Mat 16:8 </text:p>
          </table:table-cell>
          <table:table-cell table:style-name="Table1.B2" office:value-type="string">
            <text:p text:style-name="P3"><text:span text:style-name="T2">Which</text:span> when Jesus perceived, he said unto them, <text:span text:style-name="T1">O ye of little faith[</text:span><text:span text:style-name="T3">G3640</text:span><text:span text:style-name="T1">], why reason ye among yourselves, because ye have brought no bread?</text:span> </text:p>
          </table:table-cell>
        </table:table-row>
        <table:table-row table:style-name="Table1.1">
          <table:table-cell table:style-name="Table1.A2" office:value-type="string">
            <text:p text:style-name="Table_20_Contents"><text:bookmark text:name="Luk"/>Luk 12:28 </text:p>
          </table:table-cell>
          <table:table-cell table:style-name="Table1.B2" office:value-type="string">
            <text:p text:style-name="P3"><text:span text:style-name="T1">If then God so clothe the grass, which is to day in the field, and to morrow is cast into the oven; how much more</text:span> <text:span text:style-name="T2">will he clothe</text:span> <text:span text:style-name="T1">you, O ye of little faith[</text:span><text:span text:style-name="T3">G3640</text:span><text:span text:style-name="T1">]?</text:span></text:p>
          </table:table-cell>
        </table:table-row>
      </table:table>
      <text:p text:style-name="Table_20_Contents"/>
      <text:p text:style-name="Table_20_Contents"/>
      <text:p text:style-name="P2">G4102: persuasion, i.e. credence; moral conviction (of religious truth, or the truthfulness of God or a religious teacher), especially reliance upon Christ for salvation; abstractly, constancy in such profession; by extension, the system of religious (Gospel) truth itself</text:p>
      <text:p text:style-name="P4">outline: <text:span text:style-name="T4">assurance, belief/believeth/believe, </text:span><text:span text:style-name="T5">fidelity</text:span></text:p>
      <text:p text:style-name="P2"/>
      <text:p text:style-name="P2"/>
      <table:table table:name="Table2" table:style-name="Table2">
        <table:table-column table:style-name="Table2.A"/>
        <table:table-column table:style-name="Table2.B"/>
        <table:table-row table:style-name="Table2.1">
          <table:table-cell table:style-name="Table2.A1" office:value-type="string">
            <text:p text:style-name="Table_20_Contents"><text:a xlink:type="simple" xlink:href="bible://AVs/Mat%208:10" text:style-name="Internet_20_link" text:visited-style-name="Visited_20_Internet_20_Link"><text:span text:style-name="T6">Mat 8:10</text:span></text:a><text:span text:style-name="T7"> </text:span></text:p>
          </table:table-cell>
          <table:table-cell table:style-name="Table2.B1" office:value-type="string">
            <text:p text:style-name="P3">When Jesus heard <text:span text:style-name="T2">it</text:span>, he marvelled, and said to them that followed, <text:span text:style-name="T1">Verily I say unto you, I have not found so great faith[</text:span><text:span text:style-name="T3">G4102</text:span><text:span text:style-name="T1">], no, not in Israel.</text:span> </text:p>
          </table:table-cell>
        </table:table-row>
        <table:table-row table:style-name="Table2.2">
          <table:table-cell table:style-name="Table2.A2" office:value-type="string">
            <text:p text:style-name="Table_20_Contents"><text:a xlink:type="simple" xlink:href="bible://AVs/Mat%209:2" text:style-name="Internet_20_link" text:visited-style-name="Visited_20_Internet_20_Link"><text:bookmark text:name="Mat Copy 27"/><text:span text:style-name="T6">Mat 9:2</text:span></text:a><text:span text:style-name="T7"> </text:span></text:p>
          </table:table-cell>
          <table:table-cell table:style-name="Table2.B2" office:value-type="string">
            <text:p text:style-name="P3">And, behold, they brought to him a man sick of the palsy, lying on a bed: and Jesus seeing their faith[<text:span text:style-name="T8">G4102</text:span>] said unto the sick of the palsy; <text:span text:style-name="T1">Son, be of good cheer; thy sins be forgiven thee.</text:span> </text:p>
          </table:table-cell>
        </table:table-row>
        <table:table-row table:style-name="Table2.1">
          <table:table-cell table:style-name="Table2.A2" office:value-type="string">
            <text:p text:style-name="Table_20_Contents"><text:a xlink:type="simple" xlink:href="bible://AVs/Mat%209:22" text:style-name="Internet_20_link" text:visited-style-name="Visited_20_Internet_20_Link"><text:bookmark text:name="Mat Copy 28"/><text:span text:style-name="T6">Mat 9:22</text:span></text:a><text:span text:style-name="T7"> </text:span></text:p>
          </table:table-cell>
          <table:table-cell table:style-name="Table2.B2" office:value-type="string">
            <text:p text:style-name="P3">But Jesus turned him about, and when he saw her, he said, <text:span text:style-name="T1">Daughter, be of good comfort; thy faith[</text:span><text:span text:style-name="T3">G4102</text:span><text:span text:style-name="T1">] hath made thee whole.</text:span> And the woman was made whole from that hour. </text:p>
          </table:table-cell>
        </table:table-row>
        <table:table-row table:style-name="Table2.4">
          <table:table-cell table:style-name="Table2.A2" office:value-type="string">
            <text:p text:style-name="Table_20_Contents"><text:a xlink:type="simple" xlink:href="bible://AVs/Mat%209:29" text:style-name="Internet_20_link" text:visited-style-name="Visited_20_Internet_20_Link"><text:bookmark text:name="Mat Copy 29"/><text:span text:style-name="T6">Mat 9:29</text:span></text:a><text:span text:style-name="T7"> </text:span></text:p>
          </table:table-cell>
          <table:table-cell table:style-name="Table2.B2" office:value-type="string">
            <text:p text:style-name="P3">Then touched he their eyes, saying, <text:span text:style-name="T1">According to your faith[</text:span><text:span text:style-name="T3">G4102</text:span><text:span text:style-name="T1">] be it unto you.</text:span> </text:p>
          </table:table-cell>
        </table:table-row>
        <table:table-row table:style-name="Table2.1">
          <table:table-cell table:style-name="Table2.A2" office:value-type="string">
            <text:p text:style-name="Table_20_Contents"><text:a xlink:type="simple" xlink:href="bible://AVs/Mat%2015:28" text:style-name="Internet_20_link" text:visited-style-name="Visited_20_Internet_20_Link"><text:bookmark text:name="Mat Copy 30"/><text:span text:style-name="T6">Mat 15:28</text:span></text:a><text:span text:style-name="T7"> </text:span></text:p>
          </table:table-cell>
          <table:table-cell table:style-name="Table2.B2" office:value-type="string">
            <text:p text:style-name="P3">Then Jesus answered and said unto her, <text:span text:style-name="T1">O woman, great</text:span> <text:span text:style-name="T2">is</text:span> <text:span text:style-name="T1">thy faith[</text:span><text:span text:style-name="T3">G4102</text:span><text:span text:style-name="T1">]: be it unto thee even as thou wilt.</text:span> And her daughter was made whole from that very hour. </text:p>
          </table:table-cell>
        </table:table-row>
        <table:table-row table:style-name="Table2.6">
          <table:table-cell table:style-name="Table2.A2" office:value-type="string">
            <text:p text:style-name="Table_20_Contents"><text:a xlink:type="simple" xlink:href="bible://AVs/Mat%2017:20" text:style-name="Internet_20_link" text:visited-style-name="Visited_20_Internet_20_Link"><text:bookmark text:name="Mat Copy 31"/><text:span text:style-name="T6">Mat 17:20</text:span></text:a><text:span text:style-name="T7"> </text:span></text:p>
          </table:table-cell>
          <table:table-cell table:style-name="Table2.B2" office:value-type="string">
            <text:p text:style-name="P3">And Jesus said unto them, <text:span text:style-name="T1">Because of your unbelief: for verily I say unto you, If ye have faith[</text:span><text:span text:style-name="T3">G4102</text:span><text:span text:style-name="T1">] as a grain of mustard seed, ye shall say unto this mountain, Remove hence to yonder place; and it shall remove; and nothing shall be impossible unto you.</text:span> </text:p>
          </table:table-cell>
        </table:table-row>
        <table:table-row table:style-name="Table2.1">
          <table:table-cell table:style-name="Table2.A2" office:value-type="string">
            <text:p text:style-name="Table_20_Contents"><text:a xlink:type="simple" xlink:href="bible://AVs/Mat%2021:21" text:style-name="Internet_20_link" text:visited-style-name="Visited_20_Internet_20_Link"><text:bookmark text:name="Mat Copy 32"/><text:span text:style-name="T6">Mat 21:21</text:span></text:a><text:span text:style-name="T7"> </text:span></text:p>
          </table:table-cell>
          <table:table-cell table:style-name="Table2.B2" office:value-type="string">
            <text:p text:style-name="P3">Jesus answered and said unto them, <text:span text:style-name="T1">Verily I say unto you, If ye have faith[</text:span><text:span text:style-name="T3">G4102</text:span><text:span text:style-name="T1">], and doubt not, ye shall not only do this</text:span> <text:span text:style-name="T2">which is done</text:span> <text:span text:style-name="T1">to the fig tree, but also if ye shall say unto this mountain, Be thou removed, and be thou cast into the sea; it shall be done.</text:span> </text:p>
          </table:table-cell>
        </table:table-row>
        <table:table-row table:style-name="Table2.8">
          <table:table-cell table:style-name="Table2.A2" office:value-type="string">
            <text:p text:style-name="Table_20_Contents"><text:a xlink:type="simple" xlink:href="bible://AVs/Mat%2023:23" text:style-name="Internet_20_link" text:visited-style-name="Visited_20_Internet_20_Link"><text:bookmark text:name="Mat Copy 33"/><text:span text:style-name="T6">Mat 23:23</text:span></text:a><text:span text:style-name="T7"> </text:span></text:p>
          </table:table-cell>
          <table:table-cell table:style-name="Table2.B2" office:value-type="string">
            <text:p text:style-name="P3"><text:span text:style-name="T1">Woe unto you, scribes and Pharisees, hypocrites! for ye pay tithe of mint and anise</text:span><text:a xlink:type="simple" xlink:href="../../../Apps/Bible%20Analyzer%205.6%20Portable/bibleFN/AVs/Mat%2023:23://2" text:style-name="Internet_20_link" text:visited-style-name="Visited_20_Internet_20_Link"><text:span text:style-name="T9">2</text:span></text:a><text:span text:style-name="T1"> and cummin, and have omitted the weightier</text:span> <text:span text:style-name="T2">matters</text:span> <text:span text:style-name="T1">of the law, judgment, mercy, and faith[</text:span><text:span text:style-name="T3">G4102</text:span><text:span text:style-name="T1">]: these ought ye to have done, and not to leave the other undone.</text:span> </text:p>
          </table:table-cell>
        </table:table-row>
        <table:table-row table:style-name="Table2.1">
          <table:table-cell table:style-name="Table2.A2" office:value-type="string">
            <text:p text:style-name="Table_20_Contents"><text:a xlink:type="simple" xlink:href="bible://AVs/Mar%202:5" text:style-name="Internet_20_link" text:visited-style-name="Visited_20_Internet_20_Link"><text:bookmark text:name="Mar"/><text:span text:style-name="T6">Mar 2:5</text:span></text:a><text:span text:style-name="T7"> </text:span></text:p>
          </table:table-cell>
          <table:table-cell table:style-name="Table2.B2" office:value-type="string">
            <text:p text:style-name="P3">When Jesus saw their faith[<text:span text:style-name="T8">G4102</text:span>], he said unto the sick of the palsy, <text:span text:style-name="T1">Son, thy sins be forgiven thee.</text:span> </text:p>
          </table:table-cell>
        </table:table-row>
        <table:table-row table:style-name="Table2.10">
          <table:table-cell table:style-name="Table2.A2" office:value-type="string">
            <text:p text:style-name="Table_20_Contents"><text:a xlink:type="simple" xlink:href="bible://AVs/Mar%204:40" text:style-name="Internet_20_link" text:visited-style-name="Visited_20_Internet_20_Link"><text:bookmark text:name="Mar Copy 10"/><text:span text:style-name="T6">Mar 4:40</text:span></text:a><text:span text:style-name="T7"> </text:span></text:p>
          </table:table-cell>
          <table:table-cell table:style-name="Table2.B2" office:value-type="string">
            <text:p text:style-name="P3">And he said unto them, <text:span text:style-name="T1">Why are ye so fearful? how is it that ye have no faith[</text:span><text:span text:style-name="T3">G4102</text:span><text:span text:style-name="T1">]?</text:span> </text:p>
          </table:table-cell>
        </table:table-row>
        <text:soft-page-break/>
        <table:table-row table:style-name="Table2.1">
          <table:table-cell table:style-name="Table2.A2" office:value-type="string">
            <text:p text:style-name="Table_20_Contents"><text:a xlink:type="simple" xlink:href="bible://AVs/Mar%205:34" text:style-name="Internet_20_link" text:visited-style-name="Visited_20_Internet_20_Link"><text:bookmark text:name="Mar Copy 11"/><text:span text:style-name="T6">Mar 5:34</text:span></text:a><text:span text:style-name="T7"> </text:span></text:p>
          </table:table-cell>
          <table:table-cell table:style-name="Table2.B2" office:value-type="string">
            <text:p text:style-name="P3">And he said unto her, <text:span text:style-name="T1">Daughter, thy faith[</text:span><text:span text:style-name="T3">G4102</text:span><text:span text:style-name="T1">] hath made thee whole; go in peace, and be whole of thy plague.</text:span> </text:p>
          </table:table-cell>
        </table:table-row>
        <table:table-row table:style-name="Table2.12">
          <table:table-cell table:style-name="Table2.A2" office:value-type="string">
            <text:p text:style-name="Table_20_Contents"><text:a xlink:type="simple" xlink:href="bible://AVs/Mar%2010:52" text:style-name="Internet_20_link" text:visited-style-name="Visited_20_Internet_20_Link"><text:bookmark text:name="Mar Copy 12"/><text:span text:style-name="T6">Mar 10:52</text:span></text:a><text:span text:style-name="T7"> </text:span></text:p>
          </table:table-cell>
          <table:table-cell table:style-name="Table2.B2" office:value-type="string">
            <text:p text:style-name="P3">And Jesus said unto him, <text:span text:style-name="T1">Go thy way; thy faith[</text:span><text:span text:style-name="T3">G4102</text:span><text:span text:style-name="T1">] hath made</text:span><text:a xlink:type="simple" xlink:href="../../../Apps/Bible%20Analyzer%205.6%20Portable/bibleFN/AVs/Mar%2010:52://2" text:style-name="Internet_20_link" text:visited-style-name="Visited_20_Internet_20_Link"><text:span text:style-name="T9">2</text:span></text:a><text:span text:style-name="T1"> thee whole.</text:span> And immediately he received his sight, and followed Jesus in the way. </text:p>
          </table:table-cell>
        </table:table-row>
        <table:table-row table:style-name="Table2.1">
          <table:table-cell table:style-name="Table2.A2" office:value-type="string">
            <text:p text:style-name="Table_20_Contents"><text:a xlink:type="simple" xlink:href="bible://AVs/Mar%2011:22" text:style-name="Internet_20_link" text:visited-style-name="Visited_20_Internet_20_Link"><text:bookmark text:name="Mar Copy 13"/><text:span text:style-name="T6">Mar 11:22</text:span></text:a><text:span text:style-name="T7"> </text:span></text:p>
          </table:table-cell>
          <table:table-cell table:style-name="Table2.B2" office:value-type="string">
            <text:p text:style-name="P3">And Jesus answering saith unto them, <text:span text:style-name="T1">Have</text:span><text:a xlink:type="simple" xlink:href="../../../Apps/Bible%20Analyzer%205.6%20Portable/bibleFN/AVs/Mar%2011:22://2" text:style-name="Internet_20_link" text:visited-style-name="Visited_20_Internet_20_Link"><text:span text:style-name="T9">2</text:span></text:a><text:span text:style-name="T1"> faith[</text:span><text:span text:style-name="T3">G4102</text:span><text:span text:style-name="T1">] in God.</text:span> </text:p>
          </table:table-cell>
        </table:table-row>
        <table:table-row table:style-name="Table2.14">
          <table:table-cell table:style-name="Table2.A2" office:value-type="string">
            <text:p text:style-name="Table_20_Contents"><text:a xlink:type="simple" xlink:href="bible://AVs/Luk%205:20" text:style-name="Internet_20_link" text:visited-style-name="Visited_20_Internet_20_Link"><text:bookmark text:name="Luk Copy 29"/><text:span text:style-name="T6">Luk 5:20</text:span></text:a><text:span text:style-name="T7"> </text:span></text:p>
          </table:table-cell>
          <table:table-cell table:style-name="Table2.B2" office:value-type="string">
            <text:p text:style-name="P3">And when he saw their faith[<text:span text:style-name="T8">G4102</text:span>], he said unto him, <text:span text:style-name="T1">Man, thy sins are forgiven thee.</text:span> </text:p>
          </table:table-cell>
        </table:table-row>
        <table:table-row table:style-name="Table2.1">
          <table:table-cell table:style-name="Table2.A2" office:value-type="string">
            <text:p text:style-name="Table_20_Contents"><text:a xlink:type="simple" xlink:href="bible://AVs/Luk%207:9" text:style-name="Internet_20_link" text:visited-style-name="Visited_20_Internet_20_Link"><text:bookmark text:name="Luk Copy 30"/><text:span text:style-name="T6">Luk 7:9</text:span></text:a><text:span text:style-name="T7"> </text:span></text:p>
          </table:table-cell>
          <table:table-cell table:style-name="Table2.B2" office:value-type="string">
            <text:p text:style-name="P3">When Jesus heard these things, he marvelled at him, and turned him about, and said unto the people that followed him, <text:span text:style-name="T1">I say unto you, I have not found so great faith[</text:span><text:span text:style-name="T3">G4102</text:span><text:span text:style-name="T1">], no, not in Israel.</text:span> </text:p>
          </table:table-cell>
        </table:table-row>
        <table:table-row table:style-name="Table2.16">
          <table:table-cell table:style-name="Table2.A2" office:value-type="string">
            <text:p text:style-name="Table_20_Contents"><text:a xlink:type="simple" xlink:href="bible://AVs/Luk%207:50" text:style-name="Internet_20_link" text:visited-style-name="Visited_20_Internet_20_Link"><text:bookmark text:name="Luk Copy 31"/><text:span text:style-name="T6">Luk 7:50</text:span></text:a><text:span text:style-name="T7"> </text:span></text:p>
          </table:table-cell>
          <table:table-cell table:style-name="Table2.B2" office:value-type="string">
            <text:p text:style-name="P3">And he said to the woman, <text:span text:style-name="T1">Thy faith[</text:span><text:span text:style-name="T3">G4102</text:span><text:span text:style-name="T1">] hath saved thee; go in peace.</text:span> </text:p>
          </table:table-cell>
        </table:table-row>
        <table:table-row table:style-name="Table2.1">
          <table:table-cell table:style-name="Table2.A2" office:value-type="string">
            <text:p text:style-name="Table_20_Contents"><text:a xlink:type="simple" xlink:href="bible://AVs/Luk%208:25" text:style-name="Internet_20_link" text:visited-style-name="Visited_20_Internet_20_Link"><text:bookmark text:name="Luk Copy 32"/><text:span text:style-name="T6">Luk 8:25</text:span></text:a><text:span text:style-name="T7"> </text:span></text:p>
          </table:table-cell>
          <table:table-cell table:style-name="Table2.B2" office:value-type="string">
            <text:p text:style-name="P3">And he said unto them, <text:span text:style-name="T1">Where is your faith[</text:span><text:span text:style-name="T3">G4102</text:span><text:span text:style-name="T1">]?</text:span> And they being afraid wondered, saying one to another, What manner of man is this! for he commandeth even the winds and water, and they obey him. </text:p>
          </table:table-cell>
        </table:table-row>
        <table:table-row table:style-name="Table2.18">
          <table:table-cell table:style-name="Table2.A2" office:value-type="string">
            <text:p text:style-name="Table_20_Contents"><text:a xlink:type="simple" xlink:href="bible://AVs/Luk%208:48" text:style-name="Internet_20_link" text:visited-style-name="Visited_20_Internet_20_Link"><text:bookmark text:name="Luk Copy 33"/><text:span text:style-name="T6">Luk 8:48</text:span></text:a><text:span text:style-name="T7"> </text:span></text:p>
          </table:table-cell>
          <table:table-cell table:style-name="Table2.B2" office:value-type="string">
            <text:p text:style-name="P3">And he said unto her, <text:span text:style-name="T1">Daughter, be of good comfort: thy faith[</text:span><text:span text:style-name="T3">G4102</text:span><text:span text:style-name="T1">] hath made thee whole; go in peace.</text:span> </text:p>
          </table:table-cell>
        </table:table-row>
        <table:table-row table:style-name="Table2.1">
          <table:table-cell table:style-name="Table2.A2" office:value-type="string">
            <text:p text:style-name="Table_20_Contents"><text:a xlink:type="simple" xlink:href="bible://AVs/Luk%2017:5" text:style-name="Internet_20_link" text:visited-style-name="Visited_20_Internet_20_Link"><text:bookmark text:name="Luk Copy 34"/><text:span text:style-name="T6">Luk 17:5</text:span></text:a><text:span text:style-name="T7"> </text:span></text:p>
          </table:table-cell>
          <table:table-cell table:style-name="Table2.B2" office:value-type="string">
            <text:p text:style-name="P3">And the apostles said unto the Lord, Increase our faith[<text:span text:style-name="T8">G4102</text:span>]. </text:p>
          </table:table-cell>
        </table:table-row>
        <table:table-row table:style-name="Table2.20">
          <table:table-cell table:style-name="Table2.A2" office:value-type="string">
            <text:p text:style-name="Table_20_Contents"><text:a xlink:type="simple" xlink:href="bible://AVs/Luk%2017:6" text:style-name="Internet_20_link" text:visited-style-name="Visited_20_Internet_20_Link"><text:bookmark text:name="Luk Copy 35"/><text:span text:style-name="T6">Luk 17:6</text:span></text:a><text:span text:style-name="T7"> </text:span></text:p>
          </table:table-cell>
          <table:table-cell table:style-name="Table2.B2" office:value-type="string">
            <text:p text:style-name="P3">And the Lord said, <text:span text:style-name="T1">If ye had faith[</text:span><text:span text:style-name="T3">G4102</text:span><text:span text:style-name="T1">] as a grain of mustard seed, ye might say unto this sycamine tree, Be thou plucked up by the root, and be thou planted in the sea; and it should obey you.</text:span> </text:p>
          </table:table-cell>
        </table:table-row>
        <table:table-row table:style-name="Table2.1">
          <table:table-cell table:style-name="Table2.A2" office:value-type="string">
            <text:p text:style-name="Table_20_Contents"><text:a xlink:type="simple" xlink:href="bible://AVs/Luk%2017:19" text:style-name="Internet_20_link" text:visited-style-name="Visited_20_Internet_20_Link"><text:bookmark text:name="Luk Copy 36"/><text:span text:style-name="T6">Luk 17:19</text:span></text:a><text:span text:style-name="T7"> </text:span></text:p>
          </table:table-cell>
          <table:table-cell table:style-name="Table2.B2" office:value-type="string">
            <text:p text:style-name="P3">And he said unto him, <text:span text:style-name="T1">Arise, go thy way: thy faith[</text:span><text:span text:style-name="T3">G4102</text:span><text:span text:style-name="T1">] hath made thee whole.</text:span> </text:p>
          </table:table-cell>
        </table:table-row>
        <table:table-row table:style-name="Table2.22">
          <table:table-cell table:style-name="Table2.A2" office:value-type="string">
            <text:p text:style-name="Table_20_Contents"><text:a xlink:type="simple" xlink:href="bible://AVs/Luk%2018:8" text:style-name="Internet_20_link" text:visited-style-name="Visited_20_Internet_20_Link"><text:bookmark text:name="Luk Copy 37"/><text:span text:style-name="T6">Luk 18:8</text:span></text:a><text:span text:style-name="T7"> </text:span></text:p>
          </table:table-cell>
          <table:table-cell table:style-name="Table2.B2" office:value-type="string">
            <text:p text:style-name="P3"><text:span text:style-name="T1">I tell you that he will avenge them speedily. Nevertheless when the Son of man cometh, shall he find faith[</text:span><text:span text:style-name="T3">G4102</text:span><text:span text:style-name="T1">] on the earth?</text:span> </text:p>
          </table:table-cell>
        </table:table-row>
        <table:table-row table:style-name="Table2.1">
          <table:table-cell table:style-name="Table2.A2" office:value-type="string">
            <text:p text:style-name="Table_20_Contents"><text:a xlink:type="simple" xlink:href="bible://AVs/Luk%2018:42" text:style-name="Internet_20_link" text:visited-style-name="Visited_20_Internet_20_Link"><text:bookmark text:name="Luk Copy 38"/><text:span text:style-name="T6">Luk 18:42</text:span></text:a><text:span text:style-name="T7"> </text:span></text:p>
          </table:table-cell>
          <table:table-cell table:style-name="Table2.B2" office:value-type="string">
            <text:p text:style-name="P3">And Jesus said unto him, <text:span text:style-name="T1">Receive thy sight: thy faith[</text:span><text:span text:style-name="T3">G4102</text:span><text:span text:style-name="T1">] hath saved thee.</text:span> </text:p>
          </table:table-cell>
        </table:table-row>
        <table:table-row table:style-name="Table2.24">
          <table:table-cell table:style-name="Table2.A2" office:value-type="string">
            <text:p text:style-name="Table_20_Contents"><text:a xlink:type="simple" xlink:href="bible://AVs/Luk%2022:32" text:style-name="Internet_20_link" text:visited-style-name="Visited_20_Internet_20_Link"><text:bookmark text:name="Luk Copy 39"/><text:span text:style-name="T6">Luk 22:32</text:span></text:a><text:span text:style-name="T7"> </text:span></text:p>
          </table:table-cell>
          <table:table-cell table:style-name="Table2.B2" office:value-type="string">
            <text:p text:style-name="P3"><text:span text:style-name="T1">But I have prayed for thee, that thy faith[</text:span><text:span text:style-name="T3">G4102</text:span><text:span text:style-name="T1">] fail not: and when thou art converted, strengthen thy brethren.</text:span> </text:p>
          </table:table-cell>
        </table:table-row>
        <table:table-row table:style-name="Table2.1">
          <table:table-cell table:style-name="Table2.A2" office:value-type="string">
            <text:p text:style-name="Table_20_Contents"><text:a xlink:type="simple" xlink:href="bible://AVs/Act%203:16" text:style-name="Internet_20_link" text:visited-style-name="Visited_20_Internet_20_Link"><text:bookmark text:name="Act"/><text:span text:style-name="T6">Act 3:16</text:span></text:a><text:span text:style-name="T7"> </text:span></text:p>
          </table:table-cell>
          <table:table-cell table:style-name="Table2.B2" office:value-type="string">
            <text:p text:style-name="P3">And his name through faith[<text:span text:style-name="T8">G4102</text:span>] in his name hath made this man strong, whom ye see and know: yea, the faith[<text:span text:style-name="T8">G4102</text:span>] which is by him hath given him this perfect soundness in the presence of you all. </text:p>
          </table:table-cell>
        </table:table-row>
        <table:table-row table:style-name="Table2.26">
          <table:table-cell table:style-name="Table2.A2" office:value-type="string">
            <text:p text:style-name="Table_20_Contents"><text:a xlink:type="simple" xlink:href="bible://AVs/Act%206:5" text:style-name="Internet_20_link" text:visited-style-name="Visited_20_Internet_20_Link"><text:bookmark text:name="Act Copy 23"/><text:span text:style-name="T6">Act 6:5</text:span></text:a><text:span text:style-name="T7"> </text:span></text:p>
          </table:table-cell>
          <table:table-cell table:style-name="Table2.B2" office:value-type="string">
            <text:p text:style-name="P3">¶ And the saying pleased the whole multitude: and they chose Stephen, a man full of faith[<text:span text:style-name="T8">G4102</text:span>] and of the Holy Ghost, and Philip, and Prochorus, and Nicanor, and Timon, and Parmenas, and Nicolas a proselyte of Antioch: </text:p>
          </table:table-cell>
        </table:table-row>
        <table:table-row table:style-name="Table2.1">
          <table:table-cell table:style-name="Table2.A2" office:value-type="string">
            <text:p text:style-name="Table_20_Contents"><text:a xlink:type="simple" xlink:href="bible://AVs/Act%206:7" text:style-name="Internet_20_link" text:visited-style-name="Visited_20_Internet_20_Link"><text:bookmark text:name="Act Copy 24"/><text:span text:style-name="T6">Act 6:7</text:span></text:a><text:span text:style-name="T7"> </text:span></text:p>
          </table:table-cell>
          <table:table-cell table:style-name="Table2.B2" office:value-type="string">
            <text:p text:style-name="P3">And the word of God increased; and the number of the disciples multiplied in Jerusalem greatly; and a great company of the priests were obedient to the faith[<text:span text:style-name="T8">G4102</text:span>]. </text:p>
          </table:table-cell>
        </table:table-row>
        <table:table-row table:style-name="Table2.28">
          <table:table-cell table:style-name="Table2.A2" office:value-type="string">
            <text:p text:style-name="Table_20_Contents"><text:a xlink:type="simple" xlink:href="bible://AVs/Act%206:8" text:style-name="Internet_20_link" text:visited-style-name="Visited_20_Internet_20_Link"><text:bookmark text:name="Act Copy 25"/><text:span text:style-name="T6">Act 6:8</text:span></text:a><text:span text:style-name="T7"> </text:span></text:p>
          </table:table-cell>
          <table:table-cell table:style-name="Table2.B2" office:value-type="string">
            <text:p text:style-name="P3">And Stephen, full of faith[<text:span text:style-name="T8">G4102</text:span>] and power, did great wonders and miracles among the people. </text:p>
          </table:table-cell>
        </table:table-row>
        <table:table-row table:style-name="Table2.1">
          <table:table-cell table:style-name="Table2.A2" office:value-type="string">
            <text:p text:style-name="Table_20_Contents"><text:a xlink:type="simple" xlink:href="bible://AVs/Act%2011:24" text:style-name="Internet_20_link" text:visited-style-name="Visited_20_Internet_20_Link"><text:bookmark text:name="Act Copy 26"/><text:span text:style-name="T6">Act 11:24</text:span></text:a><text:span text:style-name="T7"> </text:span></text:p>
          </table:table-cell>
          <table:table-cell table:style-name="Table2.B2" office:value-type="string">
            <text:p text:style-name="P3">For he was a good man, and full of the Holy Ghost and of faith[<text:span text:style-name="T8">G4102</text:span>]: and much people was added unto the Lord. </text:p>
          </table:table-cell>
        </table:table-row>
        <table:table-row table:style-name="Table2.30">
          <table:table-cell table:style-name="Table2.A2" office:value-type="string">
            <text:p text:style-name="Table_20_Contents"><text:a xlink:type="simple" xlink:href="bible://AVs/Act%2013:8" text:style-name="Internet_20_link" text:visited-style-name="Visited_20_Internet_20_Link"><text:bookmark text:name="Act Copy 27"/><text:span text:style-name="T6">Act 13:8</text:span></text:a><text:span text:style-name="T7"> </text:span></text:p>
          </table:table-cell>
          <table:table-cell table:style-name="Table2.B2" office:value-type="string">
            <text:p text:style-name="P3">But Elymas the sorcerer (for so is his name by interpretation) withstood them, seeking to turn away the deputy from the faith[<text:span text:style-name="T8">G4102</text:span>]. </text:p>
          </table:table-cell>
        </table:table-row>
        <table:table-row table:style-name="Table2.1">
          <table:table-cell table:style-name="Table2.A2" office:value-type="string">
            <text:p text:style-name="Table_20_Contents"><text:a xlink:type="simple" xlink:href="bible://AVs/Act%2014:9" text:style-name="Internet_20_link" text:visited-style-name="Visited_20_Internet_20_Link"><text:bookmark text:name="Act Copy 28"/><text:span text:style-name="T6">Act 14:9</text:span></text:a><text:span text:style-name="T7"> </text:span></text:p>
          </table:table-cell>
          <table:table-cell table:style-name="Table2.B2" office:value-type="string">
            <text:p text:style-name="P3">The same heard Paul speak: who stedfastly beholding him, and perceiving that he had faith[<text:span text:style-name="T8">G4102</text:span>] to be healed, </text:p>
          </table:table-cell>
        </table:table-row>
        <table:table-row table:style-name="Table2.32">
          <table:table-cell table:style-name="Table2.A2" office:value-type="string">
            <text:p text:style-name="Table_20_Contents"><text:a xlink:type="simple" xlink:href="bible://AVs/Act%2014:22" text:style-name="Internet_20_link" text:visited-style-name="Visited_20_Internet_20_Link"><text:bookmark text:name="Act Copy 29"/><text:span text:style-name="T6">Act 14:22</text:span></text:a><text:span text:style-name="T7"> </text:span></text:p>
          </table:table-cell>
          <table:table-cell table:style-name="Table2.B2" office:value-type="string">
            <text:p text:style-name="P3">Confirming the souls of the disciples, <text:span text:style-name="T2">and</text:span> exhorting them to continue in the faith[<text:span text:style-name="T8">G4102</text:span>], and that we must through much tribulation enter into the kingdom of God. </text:p>
          </table:table-cell>
        </table:table-row>
        <text:soft-page-break/>
        <table:table-row table:style-name="Table2.1">
          <table:table-cell table:style-name="Table2.A2" office:value-type="string">
            <text:p text:style-name="Table_20_Contents"><text:a xlink:type="simple" xlink:href="bible://AVs/Act%2014:27" text:style-name="Internet_20_link" text:visited-style-name="Visited_20_Internet_20_Link"><text:bookmark text:name="Act Copy 30"/><text:span text:style-name="T6">Act 14:27</text:span></text:a><text:span text:style-name="T7"> </text:span></text:p>
          </table:table-cell>
          <table:table-cell table:style-name="Table2.B2" office:value-type="string">
            <text:p text:style-name="P3">And when they were come, and had gathered the church together, they rehearsed all that God had done with them, and how he had opened the door of faith[<text:span text:style-name="T8">G4102</text:span>] unto the Gentiles. </text:p>
          </table:table-cell>
        </table:table-row>
        <table:table-row table:style-name="Table2.34">
          <table:table-cell table:style-name="Table2.A2" office:value-type="string">
            <text:p text:style-name="Table_20_Contents"><text:a xlink:type="simple" xlink:href="bible://AVs/Act%2015:9" text:style-name="Internet_20_link" text:visited-style-name="Visited_20_Internet_20_Link"><text:bookmark text:name="Act Copy 31"/><text:span text:style-name="T6">Act 15:9</text:span></text:a><text:span text:style-name="T7"> </text:span></text:p>
          </table:table-cell>
          <table:table-cell table:style-name="Table2.B2" office:value-type="string">
            <text:p text:style-name="P3">And put no difference between us and them, purifying their hearts by faith[<text:span text:style-name="T8">G4102</text:span>]. </text:p>
          </table:table-cell>
        </table:table-row>
        <table:table-row table:style-name="Table2.1">
          <table:table-cell table:style-name="Table2.A2" office:value-type="string">
            <text:p text:style-name="Table_20_Contents"><text:a xlink:type="simple" xlink:href="bible://AVs/Act%2016:5" text:style-name="Internet_20_link" text:visited-style-name="Visited_20_Internet_20_Link"><text:bookmark text:name="Act Copy 32"/><text:span text:style-name="T6">Act 16:5</text:span></text:a><text:span text:style-name="T7"> </text:span></text:p>
          </table:table-cell>
          <table:table-cell table:style-name="Table2.B2" office:value-type="string">
            <text:p text:style-name="P3">And so were the churches established in the faith[<text:span text:style-name="T8">G4102</text:span>], and increased in number daily. </text:p>
          </table:table-cell>
        </table:table-row>
        <table:table-row table:style-name="Table2.36">
          <table:table-cell table:style-name="Table2.A2" office:value-type="string">
            <text:p text:style-name="Table_20_Contents"><text:a xlink:type="simple" xlink:href="bible://AVs/Act%2017:31" text:style-name="Internet_20_link" text:visited-style-name="Visited_20_Internet_20_Link"><text:bookmark text:name="Act Copy 33"/><text:span text:style-name="T6">Act 17:31</text:span></text:a><text:span text:style-name="T7"> </text:span></text:p>
          </table:table-cell>
          <table:table-cell table:style-name="Table2.B2" office:value-type="string">
            <text:p text:style-name="P3">Because he hath appointed a day, in the which he will judge the world in righteousness by <text:span text:style-name="T2">that</text:span> man whom he hath ordained; <text:span text:style-name="T2">whereof</text:span> he hath<text:a xlink:type="simple" xlink:href="../../../Apps/Bible%20Analyzer%205.6%20Portable/bibleFN/AVs/Act%2017:31://7" text:style-name="Internet_20_link" text:visited-style-name="Visited_20_Internet_20_Link"><text:span text:style-name="T9">7</text:span></text:a> given assurance[<text:span text:style-name="T8">G4102</text:span>] unto all <text:span text:style-name="T2">men</text:span>, in that he hath raised him from the dead. </text:p>
          </table:table-cell>
        </table:table-row>
        <table:table-row table:style-name="Table2.1">
          <table:table-cell table:style-name="Table2.A2" office:value-type="string">
            <text:p text:style-name="Table_20_Contents"><text:a xlink:type="simple" xlink:href="bible://AVs/Act%2020:21" text:style-name="Internet_20_link" text:visited-style-name="Visited_20_Internet_20_Link"><text:bookmark text:name="Act Copy 34"/><text:span text:style-name="T6">Act 20:21</text:span></text:a><text:span text:style-name="T7"> </text:span></text:p>
          </table:table-cell>
          <table:table-cell table:style-name="Table2.B2" office:value-type="string">
            <text:p text:style-name="P3">Testifying both to the Jews, and also to the Greeks, repentance toward God, and faith[<text:span text:style-name="T8">G4102</text:span>] toward our Lord Jesus Christ. </text:p>
          </table:table-cell>
        </table:table-row>
        <table:table-row table:style-name="Table2.38">
          <table:table-cell table:style-name="Table2.A2" office:value-type="string">
            <text:p text:style-name="Table_20_Contents"><text:a xlink:type="simple" xlink:href="bible://AVs/Act%2024:24" text:style-name="Internet_20_link" text:visited-style-name="Visited_20_Internet_20_Link"><text:bookmark text:name="Act Copy 35"/><text:span text:style-name="T6">Act 24:24</text:span></text:a><text:span text:style-name="T7"> </text:span></text:p>
          </table:table-cell>
          <table:table-cell table:style-name="Table2.B2" office:value-type="string">
            <text:p text:style-name="P3">And after certain days, when Felix came with his wife Drusilla, which was a Jewess, he sent for Paul, and heard him concerning the faith[<text:span text:style-name="T8">G4102</text:span>] in Christ. </text:p>
          </table:table-cell>
        </table:table-row>
        <table:table-row table:style-name="Table2.1">
          <table:table-cell table:style-name="Table2.A2" office:value-type="string">
            <text:p text:style-name="Table_20_Contents"><text:a xlink:type="simple" xlink:href="bible://AVs/Act%2026:18" text:style-name="Internet_20_link" text:visited-style-name="Visited_20_Internet_20_Link"><text:bookmark text:name="Act Copy 36"/><text:span text:style-name="T6">Act 26:18</text:span></text:a><text:span text:style-name="T7"> </text:span></text:p>
          </table:table-cell>
          <table:table-cell table:style-name="Table2.B2" office:value-type="string">
            <text:p text:style-name="P3"><text:span text:style-name="T1">To open their eyes,</text:span> <text:span text:style-name="T2">and</text:span> <text:span text:style-name="T1">to turn</text:span> <text:span text:style-name="T2">them</text:span> <text:span text:style-name="T1">from darkness to light, and</text:span> <text:span text:style-name="T2">from</text:span> <text:span text:style-name="T1">the power of Satan unto God, that they may receive forgiveness of sins, and inheritance among them which are sanctified by faith[</text:span><text:span text:style-name="T3">G4102</text:span><text:span text:style-name="T1">] that is in me.</text:span> </text:p>
          </table:table-cell>
        </table:table-row>
        <table:table-row table:style-name="Table2.40">
          <table:table-cell table:style-name="Table2.A2" office:value-type="string">
            <text:p text:style-name="Table_20_Contents"><text:a xlink:type="simple" xlink:href="bible://AVs/Rom%201:5" text:style-name="Internet_20_link" text:visited-style-name="Visited_20_Internet_20_Link"><text:bookmark text:name="Rom"/><text:span text:style-name="T6">Rom 1:5</text:span></text:a><text:span text:style-name="T7"> </text:span></text:p>
          </table:table-cell>
          <table:table-cell table:style-name="Table2.B2" office:value-type="string">
            <text:p text:style-name="P3">By whom we have received grace and apostleship, for<text:a xlink:type="simple" xlink:href="../../../Apps/Bible%20Analyzer%205.6%20Portable/bibleFN/AVs/Rom%201:5://2" text:style-name="Internet_20_link" text:visited-style-name="Visited_20_Internet_20_Link"><text:span text:style-name="T9">2</text:span></text:a> obedience to the faith[<text:span text:style-name="T8">G4102</text:span>] among all nations, for his name: </text:p>
          </table:table-cell>
        </table:table-row>
        <table:table-row table:style-name="Table2.1">
          <table:table-cell table:style-name="Table2.A2" office:value-type="string">
            <text:p text:style-name="Table_20_Contents"><text:a xlink:type="simple" xlink:href="bible://AVs/Rom%201:8" text:style-name="Internet_20_link" text:visited-style-name="Visited_20_Internet_20_Link"><text:bookmark text:name="Rom Copy 43"/><text:span text:style-name="T6">Rom 1:8</text:span></text:a><text:span text:style-name="T7"> </text:span></text:p>
          </table:table-cell>
          <table:table-cell table:style-name="Table2.B2" office:value-type="string">
            <text:p text:style-name="P3">First, I thank my God through Jesus Christ for you all, that your faith[<text:span text:style-name="T8">G4102</text:span>] is spoken of throughout the whole world. </text:p>
          </table:table-cell>
        </table:table-row>
        <table:table-row table:style-name="Table2.42">
          <table:table-cell table:style-name="Table2.A2" office:value-type="string">
            <text:p text:style-name="Table_20_Contents"><text:a xlink:type="simple" xlink:href="bible://AVs/Rom%201:12" text:style-name="Internet_20_link" text:visited-style-name="Visited_20_Internet_20_Link"><text:bookmark text:name="Rom Copy 44"/><text:span text:style-name="T6">Rom 1:12</text:span></text:a><text:span text:style-name="T7"> </text:span></text:p>
          </table:table-cell>
          <table:table-cell table:style-name="Table2.B2" office:value-type="string">
            <text:p text:style-name="P3">That is, that I may be comforted together with<text:a xlink:type="simple" xlink:href="../../../Apps/Bible%20Analyzer%205.6%20Portable/bibleFN/AVs/Rom%201:12://4" text:style-name="Internet_20_link" text:visited-style-name="Visited_20_Internet_20_Link"><text:span text:style-name="T9">4</text:span></text:a> you by the mutual faith[<text:span text:style-name="T8">G4102</text:span>] both of you and me. </text:p>
          </table:table-cell>
        </table:table-row>
        <table:table-row table:style-name="Table2.1">
          <table:table-cell table:style-name="Table2.A2" office:value-type="string">
            <text:p text:style-name="Table_20_Contents"><text:a xlink:type="simple" xlink:href="bible://AVs/Rom%201:17" text:style-name="Internet_20_link" text:visited-style-name="Visited_20_Internet_20_Link"><text:bookmark text:name="Rom Copy 45"/><text:span text:style-name="T6">Rom 1:17</text:span></text:a><text:span text:style-name="T7"> </text:span></text:p>
          </table:table-cell>
          <table:table-cell table:style-name="Table2.B2" office:value-type="string">
            <text:p text:style-name="P3">For therein is the righteousness of God revealed from faith[<text:span text:style-name="T8">G4102</text:span>] to faith[<text:span text:style-name="T8">G4102</text:span>]: as it is written, The just shall live by faith[<text:span text:style-name="T8">G4102</text:span>]. </text:p>
          </table:table-cell>
        </table:table-row>
        <table:table-row table:style-name="Table2.44">
          <table:table-cell table:style-name="Table2.A2" office:value-type="string">
            <text:p text:style-name="Table_20_Contents"><text:a xlink:type="simple" xlink:href="bible://AVs/Rom%203:3" text:style-name="Internet_20_link" text:visited-style-name="Visited_20_Internet_20_Link"><text:bookmark text:name="Rom Copy 46"/><text:span text:style-name="T6">Rom 3:3</text:span></text:a><text:span text:style-name="T7"> </text:span></text:p>
          </table:table-cell>
          <table:table-cell table:style-name="Table2.B2" office:value-type="string">
            <text:p text:style-name="P3">For what if some did not believe? shall their unbelief make the faith[<text:span text:style-name="T8">G4102</text:span>] of God without effect? </text:p>
          </table:table-cell>
        </table:table-row>
        <table:table-row table:style-name="Table2.1">
          <table:table-cell table:style-name="Table2.A2" office:value-type="string">
            <text:p text:style-name="Table_20_Contents"><text:a xlink:type="simple" xlink:href="bible://AVs/Rom%203:22" text:style-name="Internet_20_link" text:visited-style-name="Visited_20_Internet_20_Link"><text:bookmark text:name="Rom Copy 47"/><text:span text:style-name="T6">Rom 3:22</text:span></text:a><text:span text:style-name="T7"> </text:span></text:p>
          </table:table-cell>
          <table:table-cell table:style-name="Table2.B2" office:value-type="string">
            <text:p text:style-name="P3">Even the righteousness of God <text:span text:style-name="T2">which is</text:span> by faith[<text:span text:style-name="T8">G4102</text:span>] of Jesus Christ unto all and upon all them that believe: for there is no difference: </text:p>
          </table:table-cell>
        </table:table-row>
        <table:table-row table:style-name="Table2.46">
          <table:table-cell table:style-name="Table2.A2" office:value-type="string">
            <text:p text:style-name="Table_20_Contents"><text:a xlink:type="simple" xlink:href="bible://AVs/Rom%203:25" text:style-name="Internet_20_link" text:visited-style-name="Visited_20_Internet_20_Link"><text:bookmark text:name="Rom Copy 48"/><text:span text:style-name="T6">Rom 3:25</text:span></text:a><text:span text:style-name="T7"> </text:span></text:p>
          </table:table-cell>
          <table:table-cell table:style-name="Table2.B2" office:value-type="string">
            <text:p text:style-name="P3">Whom God hath set<text:a xlink:type="simple" xlink:href="../../../Apps/Bible%20Analyzer%205.6%20Portable/bibleFN/AVs/Rom%203:25://3" text:style-name="Internet_20_link" text:visited-style-name="Visited_20_Internet_20_Link"><text:span text:style-name="T9">3</text:span></text:a> forth <text:span text:style-name="T2">to be</text:span> a propitiation through faith[<text:span text:style-name="T8">G4102</text:span>] in his blood, to declare his righteousness for the remission<text:a xlink:type="simple" xlink:href="../../../Apps/Bible%20Analyzer%205.6%20Portable/bibleFN/AVs/Rom%203:25://4" text:style-name="Internet_20_link" text:visited-style-name="Visited_20_Internet_20_Link"><text:span text:style-name="T9">4</text:span></text:a> of sins that are past, through the forbearance of God; </text:p>
          </table:table-cell>
        </table:table-row>
        <table:table-row table:style-name="Table2.1">
          <table:table-cell table:style-name="Table2.A2" office:value-type="string">
            <text:p text:style-name="Table_20_Contents"><text:a xlink:type="simple" xlink:href="bible://AVs/Rom%203:26" text:style-name="Internet_20_link" text:visited-style-name="Visited_20_Internet_20_Link"><text:bookmark text:name="Rom Copy 49"/><text:span text:style-name="T6">Rom 3:26</text:span></text:a><text:span text:style-name="T7"> </text:span></text:p>
          </table:table-cell>
          <table:table-cell table:style-name="Table2.B2" office:value-type="string">
            <text:p text:style-name="P3">To declare, <text:span text:style-name="T2">I say</text:span>, at this time his righteousness: that he might be just, and the justifier of him which believeth[<text:span text:style-name="T8">G4102</text:span>] in Jesus. </text:p>
          </table:table-cell>
        </table:table-row>
        <table:table-row table:style-name="Table2.48">
          <table:table-cell table:style-name="Table2.A2" office:value-type="string">
            <text:p text:style-name="Table_20_Contents"><text:a xlink:type="simple" xlink:href="bible://AVs/Rom%203:27" text:style-name="Internet_20_link" text:visited-style-name="Visited_20_Internet_20_Link"><text:bookmark text:name="Rom Copy 50"/><text:span text:style-name="T6">Rom 3:27</text:span></text:a><text:span text:style-name="T7"> </text:span></text:p>
          </table:table-cell>
          <table:table-cell table:style-name="Table2.B2" office:value-type="string">
            <text:p text:style-name="P3">Where <text:span text:style-name="T2">is</text:span> boasting then? It is excluded. By what law? of works? Nay: but by the law of faith[<text:span text:style-name="T8">G4102</text:span>]. </text:p>
          </table:table-cell>
        </table:table-row>
        <table:table-row table:style-name="Table2.1">
          <table:table-cell table:style-name="Table2.A2" office:value-type="string">
            <text:p text:style-name="Table_20_Contents"><text:a xlink:type="simple" xlink:href="bible://AVs/Rom%203:28" text:style-name="Internet_20_link" text:visited-style-name="Visited_20_Internet_20_Link"><text:bookmark text:name="Rom Copy 51"/><text:span text:style-name="T6">Rom 3:28</text:span></text:a><text:span text:style-name="T7"> </text:span></text:p>
          </table:table-cell>
          <table:table-cell table:style-name="Table2.B2" office:value-type="string">
            <text:p text:style-name="P3">Therefore we conclude that a man is justified by faith[<text:span text:style-name="T8">G4102</text:span>] without the deeds of the law. </text:p>
          </table:table-cell>
        </table:table-row>
        <table:table-row table:style-name="Table2.50">
          <table:table-cell table:style-name="Table2.A2" office:value-type="string">
            <text:p text:style-name="Table_20_Contents"><text:a xlink:type="simple" xlink:href="bible://AVs/Rom%203:30" text:style-name="Internet_20_link" text:visited-style-name="Visited_20_Internet_20_Link"><text:bookmark text:name="Rom Copy 52"/><text:span text:style-name="T6">Rom 3:30</text:span></text:a><text:span text:style-name="T7"> </text:span></text:p>
          </table:table-cell>
          <table:table-cell table:style-name="Table2.B2" office:value-type="string">
            <text:p text:style-name="P3">Seeing <text:span text:style-name="T2">it is</text:span> one God, which shall justify the circumcision by faith[<text:span text:style-name="T8">G4102</text:span>], and uncircumcision through faith[<text:span text:style-name="T8">G4102</text:span>]. </text:p>
          </table:table-cell>
        </table:table-row>
        <table:table-row table:style-name="Table2.1">
          <table:table-cell table:style-name="Table2.A2" office:value-type="string">
            <text:p text:style-name="Table_20_Contents"><text:a xlink:type="simple" xlink:href="bible://AVs/Rom%203:31" text:style-name="Internet_20_link" text:visited-style-name="Visited_20_Internet_20_Link"><text:bookmark text:name="Rom Copy 53"/><text:span text:style-name="T6">Rom 3:31</text:span></text:a><text:span text:style-name="T7"> </text:span></text:p>
          </table:table-cell>
          <table:table-cell table:style-name="Table2.B2" office:value-type="string">
            <text:p text:style-name="P3">Do we then make void the law through faith[<text:span text:style-name="T8">G4102</text:span>]? God forbid: yea, we establish the law. </text:p>
          </table:table-cell>
        </table:table-row>
        <table:table-row table:style-name="Table2.52">
          <table:table-cell table:style-name="Table2.A2" office:value-type="string">
            <text:p text:style-name="Table_20_Contents"><text:a xlink:type="simple" xlink:href="bible://AVs/Rom%204:5" text:style-name="Internet_20_link" text:visited-style-name="Visited_20_Internet_20_Link"><text:bookmark text:name="Rom Copy 54"/><text:span text:style-name="T6">Rom 4:5</text:span></text:a><text:span text:style-name="T7"> </text:span></text:p>
          </table:table-cell>
          <table:table-cell table:style-name="Table2.B2" office:value-type="string">
            <text:p text:style-name="P3">But to him that worketh not, but believeth on him that justifieth the ungodly, his faith[<text:span text:style-name="T8">G4102</text:span>] is counted for righteousness. </text:p>
          </table:table-cell>
        </table:table-row>
        <table:table-row table:style-name="Table2.1">
          <table:table-cell table:style-name="Table2.A2" office:value-type="string">
            <text:p text:style-name="Table_20_Contents"><text:a xlink:type="simple" xlink:href="bible://AVs/Rom%204:9" text:style-name="Internet_20_link" text:visited-style-name="Visited_20_Internet_20_Link"><text:bookmark text:name="Rom Copy 55"/><text:span text:style-name="T6">Rom 4:9</text:span></text:a><text:span text:style-name="T7"> </text:span></text:p>
          </table:table-cell>
          <table:table-cell table:style-name="Table2.B2" office:value-type="string">
            <text:p text:style-name="P3"><text:span text:style-name="T2">Cometh</text:span> this blessedness then upon the circumcision <text:span text:style-name="T2">only</text:span>, or upon the uncircumcision also? for we say that faith[<text:span text:style-name="T8">G4102</text:span>] was reckoned to Abraham for righteousness. </text:p>
          </table:table-cell>
        </table:table-row>
        <text:soft-page-break/>
        <table:table-row table:style-name="Table2.54">
          <table:table-cell table:style-name="Table2.A2" office:value-type="string">
            <text:p text:style-name="Table_20_Contents"><text:a xlink:type="simple" xlink:href="bible://AVs/Rom%204:11" text:style-name="Internet_20_link" text:visited-style-name="Visited_20_Internet_20_Link"><text:bookmark text:name="Rom Copy 56"/><text:span text:style-name="T6">Rom 4:11</text:span></text:a><text:span text:style-name="T7"> </text:span></text:p>
          </table:table-cell>
          <table:table-cell table:style-name="Table2.B2" office:value-type="string">
            <text:p text:style-name="P3">And he received the sign of circumcision, a seal of the righteousness of the faith[<text:span text:style-name="T8">G4102</text:span>] which <text:span text:style-name="T2">he had yet</text:span> being uncircumcised: that he might be the father of all them that believe, though they be not circumcised; that righteousness might be imputed unto them also: </text:p>
          </table:table-cell>
        </table:table-row>
        <table:table-row table:style-name="Table2.1">
          <table:table-cell table:style-name="Table2.A2" office:value-type="string">
            <text:p text:style-name="Table_20_Contents"><text:a xlink:type="simple" xlink:href="bible://AVs/Rom%204:12" text:style-name="Internet_20_link" text:visited-style-name="Visited_20_Internet_20_Link"><text:bookmark text:name="Rom Copy 57"/><text:span text:style-name="T6">Rom 4:12</text:span></text:a><text:span text:style-name="T7"> </text:span></text:p>
          </table:table-cell>
          <table:table-cell table:style-name="Table2.B2" office:value-type="string">
            <text:p text:style-name="P3">And the father of circumcision to them who are not of the circumcision only, but who also walk in the steps of that faith[<text:span text:style-name="T8">G4102</text:span>] of our father Abraham, which <text:span text:style-name="T2">he had</text:span> being <text:span text:style-name="T2">yet</text:span> uncircumcised. </text:p>
          </table:table-cell>
        </table:table-row>
        <table:table-row table:style-name="Table2.56">
          <table:table-cell table:style-name="Table2.A2" office:value-type="string">
            <text:p text:style-name="Table_20_Contents"><text:a xlink:type="simple" xlink:href="bible://AVs/Rom%204:13" text:style-name="Internet_20_link" text:visited-style-name="Visited_20_Internet_20_Link"><text:bookmark text:name="Rom Copy 58"/><text:span text:style-name="T6">Rom 4:13</text:span></text:a><text:span text:style-name="T7"> </text:span></text:p>
          </table:table-cell>
          <table:table-cell table:style-name="Table2.B2" office:value-type="string">
            <text:p text:style-name="P3">For the promise, that he should be the heir of the world, <text:span text:style-name="T2">was</text:span> not to Abraham, or to his seed, through the law, but through the righteousness of faith[<text:span text:style-name="T8">G4102</text:span>]. </text:p>
          </table:table-cell>
        </table:table-row>
        <table:table-row table:style-name="Table2.1">
          <table:table-cell table:style-name="Table2.A2" office:value-type="string">
            <text:p text:style-name="Table_20_Contents"><text:a xlink:type="simple" xlink:href="bible://AVs/Rom%204:14" text:style-name="Internet_20_link" text:visited-style-name="Visited_20_Internet_20_Link"><text:bookmark text:name="Rom Copy 59"/><text:span text:style-name="T6">Rom 4:14</text:span></text:a><text:span text:style-name="T7"> </text:span></text:p>
          </table:table-cell>
          <table:table-cell table:style-name="Table2.B2" office:value-type="string">
            <text:p text:style-name="P3">For if they which are of the law <text:span text:style-name="T2">be</text:span> heirs, faith[<text:span text:style-name="T8">G4102</text:span>] is made void, and the promise made of none effect: </text:p>
          </table:table-cell>
        </table:table-row>
        <table:table-row table:style-name="Table2.58">
          <table:table-cell table:style-name="Table2.A2" office:value-type="string">
            <text:p text:style-name="Table_20_Contents"><text:a xlink:type="simple" xlink:href="bible://AVs/Rom%204:16" text:style-name="Internet_20_link" text:visited-style-name="Visited_20_Internet_20_Link"><text:bookmark text:name="Rom Copy 60"/><text:span text:style-name="T6">Rom 4:16</text:span></text:a><text:span text:style-name="T7"> </text:span></text:p>
          </table:table-cell>
          <table:table-cell table:style-name="Table2.B2" office:value-type="string">
            <text:p text:style-name="P3">Therefore <text:span text:style-name="T2">it is</text:span> of faith[<text:span text:style-name="T8">G4102</text:span>], that <text:span text:style-name="T2">it might be</text:span> by grace; to the end the promise might be sure to all the seed; not to that only which is of the law, but to that also which is of the faith[<text:span text:style-name="T8">G4102</text:span>] of Abraham; who is the father of us all, </text:p>
          </table:table-cell>
        </table:table-row>
        <table:table-row table:style-name="Table2.1">
          <table:table-cell table:style-name="Table2.A2" office:value-type="string">
            <text:p text:style-name="Table_20_Contents"><text:a xlink:type="simple" xlink:href="bible://AVs/Rom%204:19" text:style-name="Internet_20_link" text:visited-style-name="Visited_20_Internet_20_Link"><text:bookmark text:name="Rom Copy 61"/><text:span text:style-name="T6">Rom 4:19</text:span></text:a><text:span text:style-name="T7"> </text:span></text:p>
          </table:table-cell>
          <table:table-cell table:style-name="Table2.B2" office:value-type="string">
            <text:p text:style-name="P3">And being not weak in faith[<text:span text:style-name="T8">G4102</text:span>], he considered not his own body now dead, when he was about an hundred years old, neither yet the deadness of Sara's womb: </text:p>
          </table:table-cell>
        </table:table-row>
        <table:table-row table:style-name="Table2.60">
          <table:table-cell table:style-name="Table2.A2" office:value-type="string">
            <text:p text:style-name="Table_20_Contents"><text:a xlink:type="simple" xlink:href="bible://AVs/Rom%204:20" text:style-name="Internet_20_link" text:visited-style-name="Visited_20_Internet_20_Link"><text:bookmark text:name="Rom Copy 62"/><text:span text:style-name="T6">Rom 4:20</text:span></text:a><text:span text:style-name="T7"> </text:span></text:p>
          </table:table-cell>
          <table:table-cell table:style-name="Table2.B2" office:value-type="string">
            <text:p text:style-name="P3">He staggered not at the promise of God through unbelief; but was strong in faith[<text:span text:style-name="T8">G4102</text:span>], giving glory to God; </text:p>
          </table:table-cell>
        </table:table-row>
        <table:table-row table:style-name="Table2.1">
          <table:table-cell table:style-name="Table2.A2" office:value-type="string">
            <text:p text:style-name="Table_20_Contents"><text:a xlink:type="simple" xlink:href="bible://AVs/Rom%205:1" text:style-name="Internet_20_link" text:visited-style-name="Visited_20_Internet_20_Link"><text:bookmark text:name="Rom Copy 63"/><text:span text:style-name="T6">Rom 5:1</text:span></text:a><text:span text:style-name="T7"> </text:span></text:p>
          </table:table-cell>
          <table:table-cell table:style-name="Table2.B2" office:value-type="string">
            <text:p text:style-name="P3">¶ Therefore being justified by faith[<text:span text:style-name="T8">G4102</text:span>], we have peace with God through our Lord Jesus Christ: </text:p>
          </table:table-cell>
        </table:table-row>
        <table:table-row table:style-name="Table2.62">
          <table:table-cell table:style-name="Table2.A2" office:value-type="string">
            <text:p text:style-name="Table_20_Contents"><text:a xlink:type="simple" xlink:href="bible://AVs/Rom%205:2" text:style-name="Internet_20_link" text:visited-style-name="Visited_20_Internet_20_Link"><text:bookmark text:name="Rom Copy 64"/><text:span text:style-name="T6">Rom 5:2</text:span></text:a><text:span text:style-name="T7"> </text:span></text:p>
          </table:table-cell>
          <table:table-cell table:style-name="Table2.B2" office:value-type="string">
            <text:p text:style-name="P3">By whom also we have access by faith[<text:span text:style-name="T8">G4102</text:span>] into this grace wherein we stand, and rejoice in hope of the glory of God. </text:p>
          </table:table-cell>
        </table:table-row>
        <table:table-row table:style-name="Table2.1">
          <table:table-cell table:style-name="Table2.A2" office:value-type="string">
            <text:p text:style-name="Table_20_Contents"><text:a xlink:type="simple" xlink:href="bible://AVs/Rom%209:30" text:style-name="Internet_20_link" text:visited-style-name="Visited_20_Internet_20_Link"><text:bookmark text:name="Rom Copy 65"/><text:span text:style-name="T6">Rom 9:30</text:span></text:a><text:span text:style-name="T7"> </text:span></text:p>
          </table:table-cell>
          <table:table-cell table:style-name="Table2.B2" office:value-type="string">
            <text:p text:style-name="P3">What shall we say then? That the Gentiles, which followed not after righteousness, have attained to righteousness, even the righteousness which is of faith[<text:span text:style-name="T8">G4102</text:span>]. </text:p>
          </table:table-cell>
        </table:table-row>
        <table:table-row table:style-name="Table2.64">
          <table:table-cell table:style-name="Table2.A2" office:value-type="string">
            <text:p text:style-name="Table_20_Contents"><text:a xlink:type="simple" xlink:href="bible://AVs/Rom%209:32" text:style-name="Internet_20_link" text:visited-style-name="Visited_20_Internet_20_Link"><text:bookmark text:name="Rom Copy 66"/><text:span text:style-name="T6">Rom 9:32</text:span></text:a><text:span text:style-name="T7"> </text:span></text:p>
          </table:table-cell>
          <table:table-cell table:style-name="Table2.B2" office:value-type="string">
            <text:p text:style-name="P3">Wherefore? Because <text:span text:style-name="T2">they sought it</text:span> not by faith[<text:span text:style-name="T8">G4102</text:span>], but as it were by the works of the law. For they stumbled at that stumblingstone; </text:p>
          </table:table-cell>
        </table:table-row>
        <table:table-row table:style-name="Table2.1">
          <table:table-cell table:style-name="Table2.A2" office:value-type="string">
            <text:p text:style-name="Table_20_Contents"><text:a xlink:type="simple" xlink:href="bible://AVs/Rom%2010:6" text:style-name="Internet_20_link" text:visited-style-name="Visited_20_Internet_20_Link"><text:bookmark text:name="Rom Copy 67"/><text:span text:style-name="T6">Rom 10:6</text:span></text:a><text:span text:style-name="T7"> </text:span></text:p>
          </table:table-cell>
          <table:table-cell table:style-name="Table2.B2" office:value-type="string">
            <text:p text:style-name="P3">But the righteousness which is of faith[<text:span text:style-name="T8">G4102</text:span>] speaketh on this wise, Say not in thine heart, Who shall ascend into heaven? (that is, to bring Christ down <text:span text:style-name="T2">from above</text:span>:) </text:p>
          </table:table-cell>
        </table:table-row>
        <table:table-row table:style-name="Table2.66">
          <table:table-cell table:style-name="Table2.A2" office:value-type="string">
            <text:p text:style-name="Table_20_Contents"><text:a xlink:type="simple" xlink:href="bible://AVs/Rom%2010:8" text:style-name="Internet_20_link" text:visited-style-name="Visited_20_Internet_20_Link"><text:bookmark text:name="Rom Copy 68"/><text:span text:style-name="T6">Rom 10:8</text:span></text:a><text:span text:style-name="T7"> </text:span></text:p>
          </table:table-cell>
          <table:table-cell table:style-name="Table2.B2" office:value-type="string">
            <text:p text:style-name="P3">But what saith it? The word is nigh thee, <text:span text:style-name="T2">even</text:span> in thy mouth, and in thy heart: that is, the word of faith[<text:span text:style-name="T8">G4102</text:span>], which we preach; </text:p>
          </table:table-cell>
        </table:table-row>
        <table:table-row table:style-name="Table2.1">
          <table:table-cell table:style-name="Table2.A2" office:value-type="string">
            <text:p text:style-name="Table_20_Contents"><text:a xlink:type="simple" xlink:href="bible://AVs/Rom%2010:17" text:style-name="Internet_20_link" text:visited-style-name="Visited_20_Internet_20_Link"><text:bookmark text:name="Rom Copy 69"/><text:span text:style-name="T6">Rom 10:17</text:span></text:a><text:span text:style-name="T7"> </text:span></text:p>
          </table:table-cell>
          <table:table-cell table:style-name="Table2.B2" office:value-type="string">
            <text:p text:style-name="P3">So then faith[<text:span text:style-name="T8">G4102</text:span>] <text:span text:style-name="T2">cometh</text:span> by hearing, and hearing by the word of God. </text:p>
          </table:table-cell>
        </table:table-row>
        <table:table-row table:style-name="Table2.68">
          <table:table-cell table:style-name="Table2.A2" office:value-type="string">
            <text:p text:style-name="Table_20_Contents"><text:a xlink:type="simple" xlink:href="bible://AVs/Rom%2011:20" text:style-name="Internet_20_link" text:visited-style-name="Visited_20_Internet_20_Link"><text:bookmark text:name="Rom Copy 70"/><text:span text:style-name="T6">Rom 11:20</text:span></text:a><text:span text:style-name="T7"> </text:span></text:p>
          </table:table-cell>
          <table:table-cell table:style-name="Table2.B2" office:value-type="string">
            <text:p text:style-name="P3">Well; because of unbelief they were broken off, and thou standest by faith[<text:span text:style-name="T8">G4102</text:span>]. Be not highminded, but fear: </text:p>
          </table:table-cell>
        </table:table-row>
        <table:table-row table:style-name="Table2.1">
          <table:table-cell table:style-name="Table2.A2" office:value-type="string">
            <text:p text:style-name="Table_20_Contents"><text:a xlink:type="simple" xlink:href="bible://AVs/Rom%2012:3" text:style-name="Internet_20_link" text:visited-style-name="Visited_20_Internet_20_Link"><text:bookmark text:name="Rom Copy 71"/><text:span text:style-name="T6">Rom 12:3</text:span></text:a><text:span text:style-name="T7"> </text:span></text:p>
          </table:table-cell>
          <table:table-cell table:style-name="Table2.B2" office:value-type="string">
            <text:p text:style-name="P3">For I say, through the grace given unto me, to every man that is among you, not to think <text:span text:style-name="T2">of himself</text:span> more highly than he ought to think; but to think soberly,<text:a xlink:type="simple" xlink:href="../../../Apps/Bible%20Analyzer%205.6%20Portable/bibleFN/AVs/Rom%2012:3://1" text:style-name="Internet_20_link" text:visited-style-name="Visited_20_Internet_20_Link"><text:span text:style-name="T9">1</text:span></text:a> according as God hath dealt to every man the measure of faith[<text:span text:style-name="T8">G4102</text:span>]. </text:p>
          </table:table-cell>
        </table:table-row>
        <table:table-row table:style-name="Table2.70">
          <table:table-cell table:style-name="Table2.A2" office:value-type="string">
            <text:p text:style-name="Table_20_Contents"><text:a xlink:type="simple" xlink:href="bible://AVs/Rom%2012:6" text:style-name="Internet_20_link" text:visited-style-name="Visited_20_Internet_20_Link"><text:bookmark text:name="Rom Copy 72"/><text:span text:style-name="T6">Rom 12:6</text:span></text:a><text:span text:style-name="T7"> </text:span></text:p>
          </table:table-cell>
          <table:table-cell table:style-name="Table2.B2" office:value-type="string">
            <text:p text:style-name="P3">Having then gifts differing according to the grace that is given to us, whether prophecy, <text:span text:style-name="T2">let us prophesy</text:span> according to the proportion of faith[<text:span text:style-name="T8">G4102</text:span>]; </text:p>
          </table:table-cell>
        </table:table-row>
        <table:table-row table:style-name="Table2.1">
          <table:table-cell table:style-name="Table2.A2" office:value-type="string">
            <text:p text:style-name="Table_20_Contents"><text:a xlink:type="simple" xlink:href="bible://AVs/Rom%2014:1" text:style-name="Internet_20_link" text:visited-style-name="Visited_20_Internet_20_Link"><text:bookmark text:name="Rom Copy 73"/><text:span text:style-name="T6">Rom 14:1</text:span></text:a><text:span text:style-name="T7"> </text:span></text:p>
          </table:table-cell>
          <table:table-cell table:style-name="Table2.B2" office:value-type="string">
            <text:p text:style-name="P3">¶ Him that is weak in the faith[<text:span text:style-name="T8">G4102</text:span>] receive ye, <text:span text:style-name="T2">but</text:span> not<text:a xlink:type="simple" xlink:href="../../../Apps/Bible%20Analyzer%205.6%20Portable/bibleFN/AVs/Rom%2014:1://1" text:style-name="Internet_20_link" text:visited-style-name="Visited_20_Internet_20_Link"><text:span text:style-name="T9">1</text:span></text:a> to doubtful disputations. </text:p>
          </table:table-cell>
        </table:table-row>
        <table:table-row table:style-name="Table2.72">
          <table:table-cell table:style-name="Table2.A2" office:value-type="string">
            <text:p text:style-name="Table_20_Contents"><text:a xlink:type="simple" xlink:href="bible://AVs/Rom%2014:22" text:style-name="Internet_20_link" text:visited-style-name="Visited_20_Internet_20_Link"><text:bookmark text:name="Rom Copy 74"/><text:span text:style-name="T6">Rom 14:22</text:span></text:a><text:span text:style-name="T7"> </text:span></text:p>
          </table:table-cell>
          <table:table-cell table:style-name="Table2.B2" office:value-type="string">
            <text:p text:style-name="P3">Hast thou faith[<text:span text:style-name="T8">G4102</text:span>]? have <text:span text:style-name="T2">it</text:span> to thyself before God. Happy <text:span text:style-name="T2">is</text:span> he that condemneth not himself in that thing which he alloweth. </text:p>
          </table:table-cell>
        </table:table-row>
        <table:table-row table:style-name="Table2.1">
          <table:table-cell table:style-name="Table2.A2" office:value-type="string">
            <text:p text:style-name="Table_20_Contents"><text:a xlink:type="simple" xlink:href="bible://AVs/Rom%2014:23" text:style-name="Internet_20_link" text:visited-style-name="Visited_20_Internet_20_Link"><text:bookmark text:name="Rom Copy 75"/><text:span text:style-name="T6">Rom 14:23</text:span></text:a><text:span text:style-name="T7"> </text:span></text:p>
          </table:table-cell>
          <table:table-cell table:style-name="Table2.B2" office:value-type="string">
            <text:p text:style-name="P3">And he that doubteth<text:a xlink:type="simple" xlink:href="../../../Apps/Bible%20Analyzer%205.6%20Portable/bibleFN/AVs/Rom%2014:23://7" text:style-name="Internet_20_link" text:visited-style-name="Visited_20_Internet_20_Link"><text:span text:style-name="T9">7</text:span></text:a> is damned if he eat, because <text:span text:style-name="T2">he eateth</text:span> not of faith[<text:span text:style-name="T8">G4102</text:span>]: for whatsoever <text:span text:style-name="T2">is</text:span> not of faith[<text:span text:style-name="T8">G4102</text:span>] is sin. </text:p>
          </table:table-cell>
        </table:table-row>
        <text:soft-page-break/>
        <table:table-row table:style-name="Table2.74">
          <table:table-cell table:style-name="Table2.A2" office:value-type="string">
            <text:p text:style-name="Table_20_Contents"><text:a xlink:type="simple" xlink:href="bible://AVs/Rom%2016:26" text:style-name="Internet_20_link" text:visited-style-name="Visited_20_Internet_20_Link"><text:bookmark text:name="Rom Copy 76"/><text:span text:style-name="T6">Rom 16:26</text:span></text:a><text:span text:style-name="T7"> </text:span></text:p>
          </table:table-cell>
          <table:table-cell table:style-name="Table2.B2" office:value-type="string">
            <text:p text:style-name="P3">But now is made manifest, and by the scriptures of the prophets, according to the commandment of the everlasting God, made known to all nations for the obedience of faith[<text:span text:style-name="T8">G4102</text:span>]: </text:p>
          </table:table-cell>
        </table:table-row>
        <table:table-row table:style-name="Table2.1">
          <table:table-cell table:style-name="Table2.A2" office:value-type="string">
            <text:p text:style-name="Table_20_Contents"><text:a xlink:type="simple" xlink:href="bible://AVs/1Co%202:5" text:style-name="Internet_20_link" text:visited-style-name="Visited_20_Internet_20_Link"><text:bookmark text:name="1Co"/><text:span text:style-name="T6">1Co 2:5</text:span></text:a><text:span text:style-name="T7"> </text:span></text:p>
          </table:table-cell>
          <table:table-cell table:style-name="Table2.B2" office:value-type="string">
            <text:p text:style-name="P3">That your faith[<text:span text:style-name="T8">G4102</text:span>] should not stand<text:a xlink:type="simple" xlink:href="../../../Apps/Bible%20Analyzer%205.6%20Portable/bibleFN/AVs/1Co%202:5://2" text:style-name="Internet_20_link" text:visited-style-name="Visited_20_Internet_20_Link"><text:span text:style-name="T9">2</text:span></text:a> in the wisdom of men, but in the power of God. </text:p>
          </table:table-cell>
        </table:table-row>
        <table:table-row table:style-name="Table2.76">
          <table:table-cell table:style-name="Table2.A2" office:value-type="string">
            <text:p text:style-name="Table_20_Contents"><text:a xlink:type="simple" xlink:href="bible://AVs/1Co%2012:9" text:style-name="Internet_20_link" text:visited-style-name="Visited_20_Internet_20_Link"><text:bookmark text:name="1Co Copy 8"/><text:span text:style-name="T6">1Co 12:9</text:span></text:a><text:span text:style-name="T7"> </text:span></text:p>
          </table:table-cell>
          <table:table-cell table:style-name="Table2.B2" office:value-type="string">
            <text:p text:style-name="P3">To another faith[<text:span text:style-name="T8">G4102</text:span>] by the same Spirit; to another the gifts of healing by the same Spirit; </text:p>
          </table:table-cell>
        </table:table-row>
        <table:table-row table:style-name="Table2.1">
          <table:table-cell table:style-name="Table2.A2" office:value-type="string">
            <text:p text:style-name="Table_20_Contents"><text:a xlink:type="simple" xlink:href="bible://AVs/1Co%2013:2" text:style-name="Internet_20_link" text:visited-style-name="Visited_20_Internet_20_Link"><text:bookmark text:name="1Co Copy 9"/><text:span text:style-name="T6">1Co 13:2</text:span></text:a><text:span text:style-name="T7"> </text:span></text:p>
          </table:table-cell>
          <table:table-cell table:style-name="Table2.B2" office:value-type="string">
            <text:p text:style-name="P3">And though I have <text:span text:style-name="T2">the gift of</text:span> prophecy, and understand all mysteries, and all knowledge; and though I have all faith[<text:span text:style-name="T8">G4102</text:span>], so that I could remove mountains, and have not charity, I am nothing. </text:p>
          </table:table-cell>
        </table:table-row>
        <table:table-row table:style-name="Table2.78">
          <table:table-cell table:style-name="Table2.A2" office:value-type="string">
            <text:p text:style-name="Table_20_Contents"><text:a xlink:type="simple" xlink:href="bible://AVs/1Co%2013:13" text:style-name="Internet_20_link" text:visited-style-name="Visited_20_Internet_20_Link"><text:bookmark text:name="1Co Copy 10"/><text:span text:style-name="T6">1Co 13:13</text:span></text:a><text:span text:style-name="T7"> </text:span></text:p>
          </table:table-cell>
          <table:table-cell table:style-name="Table2.B2" office:value-type="string">
            <text:p text:style-name="P3">And now abideth faith[<text:span text:style-name="T8">G4102</text:span>], hope, charity, these three; but the greatest of these <text:span text:style-name="T2">is</text:span> charity. </text:p>
          </table:table-cell>
        </table:table-row>
        <table:table-row table:style-name="Table2.1">
          <table:table-cell table:style-name="Table2.A2" office:value-type="string">
            <text:p text:style-name="Table_20_Contents"><text:a xlink:type="simple" xlink:href="bible://AVs/1Co%2015:14" text:style-name="Internet_20_link" text:visited-style-name="Visited_20_Internet_20_Link"><text:bookmark text:name="1Co Copy 11"/><text:span text:style-name="T6">1Co 15:14</text:span></text:a><text:span text:style-name="T7"> </text:span></text:p>
          </table:table-cell>
          <table:table-cell table:style-name="Table2.B2" office:value-type="string">
            <text:p text:style-name="P3">And if Christ be not risen, then <text:span text:style-name="T2">is</text:span> our preaching vain, and your faith[<text:span text:style-name="T8">G4102</text:span>] <text:span text:style-name="T2">is</text:span> also vain. </text:p>
          </table:table-cell>
        </table:table-row>
        <table:table-row table:style-name="Table2.80">
          <table:table-cell table:style-name="Table2.A2" office:value-type="string">
            <text:p text:style-name="Table_20_Contents"><text:a xlink:type="simple" xlink:href="bible://AVs/1Co%2015:17" text:style-name="Internet_20_link" text:visited-style-name="Visited_20_Internet_20_Link"><text:bookmark text:name="1Co Copy 12"/><text:span text:style-name="T6">1Co 15:17</text:span></text:a><text:span text:style-name="T7"> </text:span></text:p>
          </table:table-cell>
          <table:table-cell table:style-name="Table2.B2" office:value-type="string">
            <text:p text:style-name="P3">And if Christ be not raised, your faith[<text:span text:style-name="T8">G4102</text:span>] <text:span text:style-name="T2">is</text:span> vain; ye are yet in your sins. </text:p>
          </table:table-cell>
        </table:table-row>
        <table:table-row table:style-name="Table2.1">
          <table:table-cell table:style-name="Table2.A2" office:value-type="string">
            <text:p text:style-name="Table_20_Contents"><text:a xlink:type="simple" xlink:href="bible://AVs/1Co%2016:13" text:style-name="Internet_20_link" text:visited-style-name="Visited_20_Internet_20_Link"><text:bookmark text:name="1Co Copy 13"/><text:span text:style-name="T6">1Co 16:13</text:span></text:a><text:span text:style-name="T7"> </text:span></text:p>
          </table:table-cell>
          <table:table-cell table:style-name="Table2.B2" office:value-type="string">
            <text:p text:style-name="P3">Watch ye, stand fast in the faith[<text:span text:style-name="T8">G4102</text:span>], quit you like men, be strong. </text:p>
          </table:table-cell>
        </table:table-row>
        <table:table-row table:style-name="Table2.82">
          <table:table-cell table:style-name="Table2.A2" office:value-type="string">
            <text:p text:style-name="Table_20_Contents"><text:a xlink:type="simple" xlink:href="bible://AVs/2Co%201:24" text:style-name="Internet_20_link" text:visited-style-name="Visited_20_Internet_20_Link"><text:bookmark text:name="2Co"/><text:span text:style-name="T6">2Co 1:24</text:span></text:a><text:span text:style-name="T7"> </text:span></text:p>
          </table:table-cell>
          <table:table-cell table:style-name="Table2.B2" office:value-type="string">
            <text:p text:style-name="P3">Not for that we have dominion over your faith[<text:span text:style-name="T8">G4102</text:span>], but are helpers of your joy: for by faith[<text:span text:style-name="T8">G4102</text:span>] ye stand. </text:p>
          </table:table-cell>
        </table:table-row>
        <table:table-row table:style-name="Table2.1">
          <table:table-cell table:style-name="Table2.A2" office:value-type="string">
            <text:p text:style-name="Table_20_Contents"><text:a xlink:type="simple" xlink:href="bible://AVs/2Co%204:13" text:style-name="Internet_20_link" text:visited-style-name="Visited_20_Internet_20_Link"><text:bookmark text:name="2Co Copy 8"/><text:span text:style-name="T6">2Co 4:13</text:span></text:a><text:span text:style-name="T7"> </text:span></text:p>
          </table:table-cell>
          <table:table-cell table:style-name="Table2.B2" office:value-type="string">
            <text:p text:style-name="P3">We having the same spirit of faith[<text:span text:style-name="T8">G4102</text:span>], according as it is written, I believed, and therefore have I spoken; we also believe, and therefore speak; </text:p>
          </table:table-cell>
        </table:table-row>
        <table:table-row table:style-name="Table2.84">
          <table:table-cell table:style-name="Table2.A2" office:value-type="string">
            <text:p text:style-name="Table_20_Contents"><text:a xlink:type="simple" xlink:href="bible://AVs/2Co%205:7" text:style-name="Internet_20_link" text:visited-style-name="Visited_20_Internet_20_Link"><text:bookmark text:name="2Co Copy 9"/><text:span text:style-name="T6">2Co 5:7</text:span></text:a><text:span text:style-name="T7"> </text:span></text:p>
          </table:table-cell>
          <table:table-cell table:style-name="Table2.B2" office:value-type="string">
            <text:p text:style-name="P3">(For we walk by faith[<text:span text:style-name="T8">G4102</text:span>], not by sight:) </text:p>
          </table:table-cell>
        </table:table-row>
        <table:table-row table:style-name="Table2.1">
          <table:table-cell table:style-name="Table2.A2" office:value-type="string">
            <text:p text:style-name="Table_20_Contents"><text:a xlink:type="simple" xlink:href="bible://AVs/2Co%208:7" text:style-name="Internet_20_link" text:visited-style-name="Visited_20_Internet_20_Link"><text:bookmark text:name="2Co Copy 10"/><text:span text:style-name="T6">2Co 8:7</text:span></text:a><text:span text:style-name="T7"> </text:span></text:p>
          </table:table-cell>
          <table:table-cell table:style-name="Table2.B2" office:value-type="string">
            <text:p text:style-name="P3">Therefore, as ye abound in every <text:span text:style-name="T2">thing, in</text:span> faith[<text:span text:style-name="T8">G4102</text:span>], and utterance, and knowledge, and <text:span text:style-name="T2">in</text:span> all diligence, and <text:span text:style-name="T2">in</text:span> your love to us, <text:span text:style-name="T2">see</text:span> that ye abound in this grace also. </text:p>
          </table:table-cell>
        </table:table-row>
        <table:table-row table:style-name="Table2.86">
          <table:table-cell table:style-name="Table2.A2" office:value-type="string">
            <text:p text:style-name="Table_20_Contents"><text:a xlink:type="simple" xlink:href="bible://AVs/2Co%2010:15" text:style-name="Internet_20_link" text:visited-style-name="Visited_20_Internet_20_Link"><text:bookmark text:name="2Co Copy 11"/><text:span text:style-name="T6">2Co 10:15</text:span></text:a><text:span text:style-name="T7"> </text:span></text:p>
          </table:table-cell>
          <table:table-cell table:style-name="Table2.B2" office:value-type="string">
            <text:p text:style-name="P3">Not boasting of things without <text:span text:style-name="T2">our</text:span> measure, <text:span text:style-name="T2">that is</text:span>, of other men's labours; but having hope, when your faith[<text:span text:style-name="T8">G4102</text:span>] is increased, that we shall be enlarged<text:a xlink:type="simple" xlink:href="../../../Apps/Bible%20Analyzer%205.6%20Portable/bibleFN/AVs/2Co%2010:15://9" text:style-name="Internet_20_link" text:visited-style-name="Visited_20_Internet_20_Link"><text:span text:style-name="T9">9</text:span></text:a> by you according to our rule abundantly, </text:p>
          </table:table-cell>
        </table:table-row>
        <table:table-row table:style-name="Table2.1">
          <table:table-cell table:style-name="Table2.A2" office:value-type="string">
            <text:p text:style-name="Table_20_Contents"><text:a xlink:type="simple" xlink:href="bible://AVs/2Co%2013:5" text:style-name="Internet_20_link" text:visited-style-name="Visited_20_Internet_20_Link"><text:bookmark text:name="2Co Copy 12"/><text:span text:style-name="T6">2Co 13:5</text:span></text:a><text:span text:style-name="T7"> </text:span></text:p>
          </table:table-cell>
          <table:table-cell table:style-name="Table2.B2" office:value-type="string">
            <text:p text:style-name="P3">Examine yourselves, whether ye be in the faith[<text:span text:style-name="T8">G4102</text:span>]; prove your own selves. Know ye not your own selves, how that Jesus Christ is in you, except ye be reprobates? </text:p>
          </table:table-cell>
        </table:table-row>
        <table:table-row table:style-name="Table2.88">
          <table:table-cell table:style-name="Table2.A2" office:value-type="string">
            <text:p text:style-name="Table_20_Contents"><text:a xlink:type="simple" xlink:href="bible://AVs/Gal%201:23" text:style-name="Internet_20_link" text:visited-style-name="Visited_20_Internet_20_Link"><text:bookmark text:name="Gal"/><text:span text:style-name="T6">Gal 1:23</text:span></text:a><text:span text:style-name="T7"> </text:span></text:p>
          </table:table-cell>
          <table:table-cell table:style-name="Table2.B2" office:value-type="string">
            <text:p text:style-name="P3">But they had heard only, That he which persecuted us in times past now preacheth the faith[<text:span text:style-name="T8">G4102</text:span>] which once he destroyed. </text:p>
          </table:table-cell>
        </table:table-row>
        <table:table-row table:style-name="Table2.1">
          <table:table-cell table:style-name="Table2.A2" office:value-type="string">
            <text:p text:style-name="Table_20_Contents"><text:a xlink:type="simple" xlink:href="bible://AVs/Gal%202:16" text:style-name="Internet_20_link" text:visited-style-name="Visited_20_Internet_20_Link"><text:bookmark text:name="Gal Copy 20"/><text:span text:style-name="T6">Gal 2:16</text:span></text:a><text:span text:style-name="T7"> </text:span></text:p>
          </table:table-cell>
          <table:table-cell table:style-name="Table2.B2" office:value-type="string">
            <text:p text:style-name="P3">Knowing that a man is not justified by the works of the law, but by the faith[<text:span text:style-name="T8">G4102</text:span>] of Jesus Christ, even we have believed in Jesus Christ, that we might be justified by the faith[<text:span text:style-name="T8">G4102</text:span>] of Christ, and not by the works of the law: for by the works of the law shall no flesh be justified. </text:p>
          </table:table-cell>
        </table:table-row>
        <table:table-row table:style-name="Table2.90">
          <table:table-cell table:style-name="Table2.A2" office:value-type="string">
            <text:p text:style-name="Table_20_Contents"><text:a xlink:type="simple" xlink:href="bible://AVs/Gal%202:20" text:style-name="Internet_20_link" text:visited-style-name="Visited_20_Internet_20_Link"><text:bookmark text:name="Gal Copy 21"/><text:span text:style-name="T6">Gal 2:20</text:span></text:a><text:span text:style-name="T7"> </text:span></text:p>
          </table:table-cell>
          <table:table-cell table:style-name="Table2.B2" office:value-type="string">
            <text:p text:style-name="P3">I am crucified with Christ: nevertheless I live; yet not I, but Christ liveth in me: and the life which I now live in the flesh I live by the faith[<text:span text:style-name="T8">G4102</text:span>] of the Son of God, who loved me, and gave himself for me. </text:p>
          </table:table-cell>
        </table:table-row>
        <table:table-row table:style-name="Table2.1">
          <table:table-cell table:style-name="Table2.A2" office:value-type="string">
            <text:p text:style-name="Table_20_Contents"><text:a xlink:type="simple" xlink:href="bible://AVs/Gal%203:2" text:style-name="Internet_20_link" text:visited-style-name="Visited_20_Internet_20_Link"><text:bookmark text:name="Gal Copy 22"/><text:span text:style-name="T6">Gal 3:2</text:span></text:a><text:span text:style-name="T7"> </text:span></text:p>
          </table:table-cell>
          <table:table-cell table:style-name="Table2.B2" office:value-type="string">
            <text:p text:style-name="P3">This only would I learn of you, Received ye the Spirit by the works of the law, or by the hearing of faith[<text:span text:style-name="T8">G4102</text:span>]? </text:p>
          </table:table-cell>
        </table:table-row>
        <table:table-row table:style-name="Table2.92">
          <table:table-cell table:style-name="Table2.A2" office:value-type="string">
            <text:p text:style-name="Table_20_Contents"><text:a xlink:type="simple" xlink:href="bible://AVs/Gal%203:5" text:style-name="Internet_20_link" text:visited-style-name="Visited_20_Internet_20_Link"><text:bookmark text:name="Gal Copy 23"/><text:span text:style-name="T6">Gal 3:5</text:span></text:a><text:span text:style-name="T7"> </text:span></text:p>
          </table:table-cell>
          <table:table-cell table:style-name="Table2.B2" office:value-type="string">
            <text:p text:style-name="P3">He therefore that ministereth to you the Spirit, and worketh miracles among you, <text:span text:style-name="T2">doeth he it</text:span> by the works of the law, or by the hearing of faith[<text:span text:style-name="T8">G4102</text:span>]? </text:p>
          </table:table-cell>
        </table:table-row>
        <table:table-row table:style-name="Table2.1">
          <table:table-cell table:style-name="Table2.A2" office:value-type="string">
            <text:p text:style-name="Table_20_Contents"><text:a xlink:type="simple" xlink:href="bible://AVs/Gal%203:7" text:style-name="Internet_20_link" text:visited-style-name="Visited_20_Internet_20_Link"><text:bookmark text:name="Gal Copy 24"/><text:span text:style-name="T6">Gal 3:7</text:span></text:a><text:span text:style-name="T7"> </text:span></text:p>
          </table:table-cell>
          <table:table-cell table:style-name="Table2.B2" office:value-type="string">
            <text:p text:style-name="P3">Know ye therefore that they which are of faith[<text:span text:style-name="T8">G4102</text:span>], the same are the children of Abraham. </text:p>
          </table:table-cell>
        </table:table-row>
        <table:table-row table:style-name="Table2.94">
          <table:table-cell table:style-name="Table2.A2" office:value-type="string">
            <text:p text:style-name="Table_20_Contents"><text:a xlink:type="simple" xlink:href="bible://AVs/Gal%203:8" text:style-name="Internet_20_link" text:visited-style-name="Visited_20_Internet_20_Link"><text:bookmark text:name="Gal Copy 25"/><text:span text:style-name="T6">Gal 3:8</text:span></text:a><text:span text:style-name="T7"> </text:span></text:p>
          </table:table-cell>
          <table:table-cell table:style-name="Table2.B2" office:value-type="string">
            <text:p text:style-name="P3">And the scripture, foreseeing that God would justify the heathen through faith[<text:span text:style-name="T8">G4102</text:span>], preached before the gospel unto Abraham, <text:span text:style-name="T2">saying</text:span>, In thee shall all nations be blessed. </text:p>
          </table:table-cell>
        </table:table-row>
        <table:table-row table:style-name="Table2.1">
          <table:table-cell table:style-name="Table2.A2" office:value-type="string">
            <text:p text:style-name="Table_20_Contents"><text:a xlink:type="simple" xlink:href="bible://AVs/Gal%203:9" text:style-name="Internet_20_link" text:visited-style-name="Visited_20_Internet_20_Link"><text:bookmark text:name="Gal Copy 26"/><text:span text:style-name="T6">Gal 3:9</text:span></text:a><text:span text:style-name="T7"> </text:span></text:p>
          </table:table-cell>
          <table:table-cell table:style-name="Table2.B2" office:value-type="string">
            <text:p text:style-name="P3">So then they which be of faith[<text:span text:style-name="T8">G4102</text:span>] are blessed with faithful Abraham. </text:p>
          </table:table-cell>
        </table:table-row>
        <text:soft-page-break/>
        <table:table-row table:style-name="Table2.96">
          <table:table-cell table:style-name="Table2.A2" office:value-type="string">
            <text:p text:style-name="Table_20_Contents"><text:a xlink:type="simple" xlink:href="bible://AVs/Gal%203:11" text:style-name="Internet_20_link" text:visited-style-name="Visited_20_Internet_20_Link"><text:bookmark text:name="Gal Copy 27"/><text:span text:style-name="T6">Gal 3:11</text:span></text:a><text:span text:style-name="T7"> </text:span></text:p>
          </table:table-cell>
          <table:table-cell table:style-name="Table2.B2" office:value-type="string">
            <text:p text:style-name="P3">But that no man is justified by the law in the sight of God, <text:span text:style-name="T2">it is</text:span> evident: for, The just shall live by faith[<text:span text:style-name="T8">G4102</text:span>]. </text:p>
          </table:table-cell>
        </table:table-row>
        <table:table-row table:style-name="Table2.1">
          <table:table-cell table:style-name="Table2.A2" office:value-type="string">
            <text:p text:style-name="Table_20_Contents"><text:a xlink:type="simple" xlink:href="bible://AVs/Gal%203:12" text:style-name="Internet_20_link" text:visited-style-name="Visited_20_Internet_20_Link"><text:bookmark text:name="Gal Copy 28"/><text:span text:style-name="T6">Gal 3:12</text:span></text:a><text:span text:style-name="T7"> </text:span></text:p>
          </table:table-cell>
          <table:table-cell table:style-name="Table2.B2" office:value-type="string">
            <text:p text:style-name="P3">And the law is not of faith[<text:span text:style-name="T8">G4102</text:span>]: but, The man that doeth them shall live in them. </text:p>
          </table:table-cell>
        </table:table-row>
        <table:table-row table:style-name="Table2.98">
          <table:table-cell table:style-name="Table2.A2" office:value-type="string">
            <text:p text:style-name="Table_20_Contents"><text:a xlink:type="simple" xlink:href="bible://AVs/Gal%203:14" text:style-name="Internet_20_link" text:visited-style-name="Visited_20_Internet_20_Link"><text:bookmark text:name="Gal Copy 29"/><text:span text:style-name="T6">Gal 3:14</text:span></text:a><text:span text:style-name="T7"> </text:span></text:p>
          </table:table-cell>
          <table:table-cell table:style-name="Table2.B2" office:value-type="string">
            <text:p text:style-name="P3">That the blessing of Abraham might come on the Gentiles through Jesus Christ; that we might receive the promise of the Spirit through faith[<text:span text:style-name="T8">G4102</text:span>]. </text:p>
          </table:table-cell>
        </table:table-row>
        <table:table-row table:style-name="Table2.1">
          <table:table-cell table:style-name="Table2.A2" office:value-type="string">
            <text:p text:style-name="Table_20_Contents"><text:a xlink:type="simple" xlink:href="bible://AVs/Gal%203:22" text:style-name="Internet_20_link" text:visited-style-name="Visited_20_Internet_20_Link"><text:bookmark text:name="Gal Copy 30"/><text:span text:style-name="T6">Gal 3:22</text:span></text:a><text:span text:style-name="T7"> </text:span></text:p>
          </table:table-cell>
          <table:table-cell table:style-name="Table2.B2" office:value-type="string">
            <text:p text:style-name="P3">But the scripture hath concluded all under sin, that the promise by faith[<text:span text:style-name="T8">G4102</text:span>] of Jesus Christ might be given to them that believe. </text:p>
          </table:table-cell>
        </table:table-row>
        <table:table-row table:style-name="Table2.100">
          <table:table-cell table:style-name="Table2.A2" office:value-type="string">
            <text:p text:style-name="Table_20_Contents"><text:a xlink:type="simple" xlink:href="bible://AVs/Gal%203:23" text:style-name="Internet_20_link" text:visited-style-name="Visited_20_Internet_20_Link"><text:bookmark text:name="Gal Copy 31"/><text:span text:style-name="T6">Gal 3:23</text:span></text:a><text:span text:style-name="T7"> </text:span></text:p>
          </table:table-cell>
          <table:table-cell table:style-name="Table2.B2" office:value-type="string">
            <text:p text:style-name="P3">But before faith[<text:span text:style-name="T8">G4102</text:span>] came, we were kept under the law, shut up unto the faith[<text:span text:style-name="T8">G4102</text:span>] which should afterwards be revealed. </text:p>
          </table:table-cell>
        </table:table-row>
        <table:table-row table:style-name="Table2.1">
          <table:table-cell table:style-name="Table2.A2" office:value-type="string">
            <text:p text:style-name="Table_20_Contents"><text:a xlink:type="simple" xlink:href="bible://AVs/Gal%203:24" text:style-name="Internet_20_link" text:visited-style-name="Visited_20_Internet_20_Link"><text:bookmark text:name="Gal Copy 32"/><text:span text:style-name="T6">Gal 3:24</text:span></text:a><text:span text:style-name="T7"> </text:span></text:p>
          </table:table-cell>
          <table:table-cell table:style-name="Table2.B2" office:value-type="string">
            <text:p text:style-name="P3">Wherefore the law was our schoolmaster <text:span text:style-name="T2">to bring us</text:span> unto Christ, that we might be justified by faith[<text:span text:style-name="T8">G4102</text:span>]. </text:p>
          </table:table-cell>
        </table:table-row>
        <table:table-row table:style-name="Table2.102">
          <table:table-cell table:style-name="Table2.A2" office:value-type="string">
            <text:p text:style-name="Table_20_Contents"><text:a xlink:type="simple" xlink:href="bible://AVs/Gal%203:25" text:style-name="Internet_20_link" text:visited-style-name="Visited_20_Internet_20_Link"><text:bookmark text:name="Gal Copy 33"/><text:span text:style-name="T6">Gal 3:25</text:span></text:a><text:span text:style-name="T7"> </text:span></text:p>
          </table:table-cell>
          <table:table-cell table:style-name="Table2.B2" office:value-type="string">
            <text:p text:style-name="P3">But after that faith[<text:span text:style-name="T8">G4102</text:span>] is come, we are no longer under a schoolmaster. </text:p>
          </table:table-cell>
        </table:table-row>
        <table:table-row table:style-name="Table2.1">
          <table:table-cell table:style-name="Table2.A2" office:value-type="string">
            <text:p text:style-name="Table_20_Contents"><text:a xlink:type="simple" xlink:href="bible://AVs/Gal%203:26" text:style-name="Internet_20_link" text:visited-style-name="Visited_20_Internet_20_Link"><text:bookmark text:name="Gal Copy 34"/><text:span text:style-name="T6">Gal 3:26</text:span></text:a><text:span text:style-name="T7"> </text:span></text:p>
          </table:table-cell>
          <table:table-cell table:style-name="Table2.B2" office:value-type="string">
            <text:p text:style-name="P3">For ye are all the children of God by faith[<text:span text:style-name="T8">G4102</text:span>] in Christ Jesus. </text:p>
          </table:table-cell>
        </table:table-row>
        <table:table-row table:style-name="Table2.104">
          <table:table-cell table:style-name="Table2.A2" office:value-type="string">
            <text:p text:style-name="Table_20_Contents"><text:a xlink:type="simple" xlink:href="bible://AVs/Gal%205:5" text:style-name="Internet_20_link" text:visited-style-name="Visited_20_Internet_20_Link"><text:bookmark text:name="Gal Copy 35"/><text:span text:style-name="T6">Gal 5:5</text:span></text:a><text:span text:style-name="T7"> </text:span></text:p>
          </table:table-cell>
          <table:table-cell table:style-name="Table2.B2" office:value-type="string">
            <text:p text:style-name="P3">For we through the Spirit wait for the hope of righteousness by faith[<text:span text:style-name="T8">G4102</text:span>]. </text:p>
          </table:table-cell>
        </table:table-row>
        <table:table-row table:style-name="Table2.1">
          <table:table-cell table:style-name="Table2.A2" office:value-type="string">
            <text:p text:style-name="Table_20_Contents"><text:a xlink:type="simple" xlink:href="bible://AVs/Gal%205:6" text:style-name="Internet_20_link" text:visited-style-name="Visited_20_Internet_20_Link"><text:bookmark text:name="Gal Copy 36"/><text:span text:style-name="T6">Gal 5:6</text:span></text:a><text:span text:style-name="T7"> </text:span></text:p>
          </table:table-cell>
          <table:table-cell table:style-name="Table2.B2" office:value-type="string">
            <text:p text:style-name="P3">For in Jesus Christ neither circumcision availeth any thing, nor uncircumcision; but faith[<text:span text:style-name="T8">G4102</text:span>] which worketh by love. </text:p>
          </table:table-cell>
        </table:table-row>
        <table:table-row table:style-name="Table2.106">
          <table:table-cell table:style-name="Table2.A2" office:value-type="string">
            <text:p text:style-name="Table_20_Contents"><text:a xlink:type="simple" xlink:href="bible://AVs/Gal%205:22" text:style-name="Internet_20_link" text:visited-style-name="Visited_20_Internet_20_Link"><text:bookmark text:name="Gal Copy 37"/><text:span text:style-name="T6">Gal 5:22</text:span></text:a><text:span text:style-name="T7"> </text:span></text:p>
          </table:table-cell>
          <table:table-cell table:style-name="Table2.B2" office:value-type="string">
            <text:p text:style-name="P3">But the fruit of the Spirit is love, joy, peace, longsuffering, gentleness, goodness, faith[<text:span text:style-name="T8">G4102</text:span>], </text:p>
          </table:table-cell>
        </table:table-row>
        <table:table-row table:style-name="Table2.1">
          <table:table-cell table:style-name="Table2.A2" office:value-type="string">
            <text:p text:style-name="Table_20_Contents"><text:a xlink:type="simple" xlink:href="bible://AVs/Gal%206:10" text:style-name="Internet_20_link" text:visited-style-name="Visited_20_Internet_20_Link"><text:bookmark text:name="Gal Copy 38"/><text:span text:style-name="T6">Gal 6:10</text:span></text:a><text:span text:style-name="T7"> </text:span></text:p>
          </table:table-cell>
          <table:table-cell table:style-name="Table2.B2" office:value-type="string">
            <text:p text:style-name="P3">As we have therefore opportunity, let us do good unto all <text:span text:style-name="T2">men</text:span>, especially unto them who are of the household of faith[<text:span text:style-name="T8">G4102</text:span>]. </text:p>
          </table:table-cell>
        </table:table-row>
        <table:table-row table:style-name="Table2.108">
          <table:table-cell table:style-name="Table2.A2" office:value-type="string">
            <text:p text:style-name="Table_20_Contents"><text:a xlink:type="simple" xlink:href="bible://AVs/Eph%201:15" text:style-name="Internet_20_link" text:visited-style-name="Visited_20_Internet_20_Link"><text:bookmark text:name="Eph"/><text:span text:style-name="T6">Eph 1:15</text:span></text:a><text:span text:style-name="T7"> </text:span></text:p>
          </table:table-cell>
          <table:table-cell table:style-name="Table2.B2" office:value-type="string">
            <text:p text:style-name="P3">Wherefore I also, after I heard of your faith[<text:span text:style-name="T8">G4102</text:span>] in the Lord Jesus, and love unto all the saints, </text:p>
          </table:table-cell>
        </table:table-row>
        <table:table-row table:style-name="Table2.1">
          <table:table-cell table:style-name="Table2.A2" office:value-type="string">
            <text:p text:style-name="Table_20_Contents"><text:a xlink:type="simple" xlink:href="bible://AVs/Eph%202:8" text:style-name="Internet_20_link" text:visited-style-name="Visited_20_Internet_20_Link"><text:bookmark text:name="Eph Copy 11"/><text:span text:style-name="T6">Eph 2:8</text:span></text:a><text:span text:style-name="T7"> </text:span></text:p>
          </table:table-cell>
          <table:table-cell table:style-name="Table2.B2" office:value-type="string">
            <text:p text:style-name="P3">For by grace are ye saved through faith[<text:span text:style-name="T8">G4102</text:span>]; and that not of yourselves: <text:span text:style-name="T2">it is</text:span> the gift of God: </text:p>
          </table:table-cell>
        </table:table-row>
        <table:table-row table:style-name="Table2.110">
          <table:table-cell table:style-name="Table2.A2" office:value-type="string">
            <text:p text:style-name="Table_20_Contents"><text:a xlink:type="simple" xlink:href="bible://AVs/Eph%203:12" text:style-name="Internet_20_link" text:visited-style-name="Visited_20_Internet_20_Link"><text:bookmark text:name="Eph Copy 12"/><text:span text:style-name="T6">Eph 3:12</text:span></text:a><text:span text:style-name="T7"> </text:span></text:p>
          </table:table-cell>
          <table:table-cell table:style-name="Table2.B2" office:value-type="string">
            <text:p text:style-name="P3">In whom we have boldness and access with confidence by the faith[<text:span text:style-name="T8">G4102</text:span>] of him. </text:p>
          </table:table-cell>
        </table:table-row>
        <table:table-row table:style-name="Table2.1">
          <table:table-cell table:style-name="Table2.A2" office:value-type="string">
            <text:p text:style-name="Table_20_Contents"><text:a xlink:type="simple" xlink:href="bible://AVs/Eph%203:17" text:style-name="Internet_20_link" text:visited-style-name="Visited_20_Internet_20_Link"><text:bookmark text:name="Eph Copy 13"/><text:span text:style-name="T6">Eph 3:17</text:span></text:a><text:span text:style-name="T7"> </text:span></text:p>
          </table:table-cell>
          <table:table-cell table:style-name="Table2.B2" office:value-type="string">
            <text:p text:style-name="P3">That Christ may dwell in your hearts by faith[<text:span text:style-name="T8">G4102</text:span>]; that ye, being rooted and grounded in love, </text:p>
          </table:table-cell>
        </table:table-row>
        <table:table-row table:style-name="Table2.112">
          <table:table-cell table:style-name="Table2.A2" office:value-type="string">
            <text:p text:style-name="Table_20_Contents"><text:a xlink:type="simple" xlink:href="bible://AVs/Eph%204:5" text:style-name="Internet_20_link" text:visited-style-name="Visited_20_Internet_20_Link"><text:bookmark text:name="Eph Copy 14"/><text:span text:style-name="T6">Eph 4:5</text:span></text:a><text:span text:style-name="T7"> </text:span></text:p>
          </table:table-cell>
          <table:table-cell table:style-name="Table2.B2" office:value-type="string">
            <text:p text:style-name="P3">One Lord, one faith[<text:span text:style-name="T8">G4102</text:span>], one baptism, </text:p>
          </table:table-cell>
        </table:table-row>
        <table:table-row table:style-name="Table2.1">
          <table:table-cell table:style-name="Table2.A2" office:value-type="string">
            <text:p text:style-name="Table_20_Contents"><text:a xlink:type="simple" xlink:href="bible://AVs/Eph%204:13" text:style-name="Internet_20_link" text:visited-style-name="Visited_20_Internet_20_Link"><text:bookmark text:name="Eph Copy 15"/><text:span text:style-name="T6">Eph 4:13</text:span></text:a><text:span text:style-name="T7"> </text:span></text:p>
          </table:table-cell>
          <table:table-cell table:style-name="Table2.B2" office:value-type="string">
            <text:p text:style-name="P3">Till we all come in<text:a xlink:type="simple" xlink:href="../../../Apps/Bible%20Analyzer%205.6%20Portable/bibleFN/AVs/Eph%204:13://4" text:style-name="Internet_20_link" text:visited-style-name="Visited_20_Internet_20_Link"><text:span text:style-name="T9">4</text:span></text:a> the unity of the faith[<text:span text:style-name="T8">G4102</text:span>], and of the knowledge of the Son of God, unto a perfect man, unto the measure of the stature<text:a xlink:type="simple" xlink:href="../../../Apps/Bible%20Analyzer%205.6%20Portable/bibleFN/AVs/Eph%204:13://5" text:style-name="Internet_20_link" text:visited-style-name="Visited_20_Internet_20_Link"><text:span text:style-name="T9">5</text:span></text:a> of the fulness of Christ: </text:p>
          </table:table-cell>
        </table:table-row>
        <table:table-row table:style-name="Table2.114">
          <table:table-cell table:style-name="Table2.A2" office:value-type="string">
            <text:p text:style-name="Table_20_Contents"><text:a xlink:type="simple" xlink:href="bible://AVs/Eph%206:16" text:style-name="Internet_20_link" text:visited-style-name="Visited_20_Internet_20_Link"><text:bookmark text:name="Eph Copy 16"/><text:span text:style-name="T6">Eph 6:16</text:span></text:a><text:span text:style-name="T7"> </text:span></text:p>
          </table:table-cell>
          <table:table-cell table:style-name="Table2.B2" office:value-type="string">
            <text:p text:style-name="P3">Above all, taking the shield of faith[<text:span text:style-name="T8">G4102</text:span>], wherewith ye shall be able to quench all the fiery darts of the wicked. </text:p>
          </table:table-cell>
        </table:table-row>
        <table:table-row table:style-name="Table2.1">
          <table:table-cell table:style-name="Table2.A2" office:value-type="string">
            <text:p text:style-name="Table_20_Contents"><text:a xlink:type="simple" xlink:href="bible://AVs/Eph%206:23" text:style-name="Internet_20_link" text:visited-style-name="Visited_20_Internet_20_Link"><text:bookmark text:name="Eph Copy 17"/><text:span text:style-name="T6">Eph 6:23</text:span></text:a><text:span text:style-name="T7"> </text:span></text:p>
          </table:table-cell>
          <table:table-cell table:style-name="Table2.B2" office:value-type="string">
            <text:p text:style-name="P3">Peace <text:span text:style-name="T2">be</text:span> to the brethren, and love with faith[<text:span text:style-name="T8">G4102</text:span>], from God the Father and the Lord Jesus Christ. </text:p>
          </table:table-cell>
        </table:table-row>
        <table:table-row table:style-name="Table2.116">
          <table:table-cell table:style-name="Table2.A2" office:value-type="string">
            <text:p text:style-name="Table_20_Contents"><text:a xlink:type="simple" xlink:href="bible://AVs/Phi%201:25" text:style-name="Internet_20_link" text:visited-style-name="Visited_20_Internet_20_Link"><text:bookmark text:name="Phi"/><text:span text:style-name="T6">Phi 1:25</text:span></text:a><text:span text:style-name="T7"> </text:span></text:p>
          </table:table-cell>
          <table:table-cell table:style-name="Table2.B2" office:value-type="string">
            <text:p text:style-name="P3">And having this confidence, I know that I shall abide and continue with you all for your furtherance and joy of faith[<text:span text:style-name="T8">G4102</text:span>]; </text:p>
          </table:table-cell>
        </table:table-row>
        <table:table-row table:style-name="Table2.1">
          <table:table-cell table:style-name="Table2.A2" office:value-type="string">
            <text:p text:style-name="Table_20_Contents"><text:a xlink:type="simple" xlink:href="bible://AVs/Phi%201:27" text:style-name="Internet_20_link" text:visited-style-name="Visited_20_Internet_20_Link"><text:bookmark text:name="Phi Copy 5"/><text:span text:style-name="T6">Phi 1:27</text:span></text:a><text:span text:style-name="T7"> </text:span></text:p>
          </table:table-cell>
          <table:table-cell table:style-name="Table2.B2" office:value-type="string">
            <text:p text:style-name="P3">Only let your conversation be as it becometh the gospel of Christ: that whether I come and see you, or else be absent, I may hear of your affairs, that ye stand fast in one spirit, with one mind striving together for the faith[<text:span text:style-name="T8">G4102</text:span>] of the gospel; </text:p>
          </table:table-cell>
        </table:table-row>
        <table:table-row table:style-name="Table2.118">
          <table:table-cell table:style-name="Table2.A2" office:value-type="string">
            <text:p text:style-name="Table_20_Contents"><text:a xlink:type="simple" xlink:href="bible://AVs/Phi%202:17" text:style-name="Internet_20_link" text:visited-style-name="Visited_20_Internet_20_Link"><text:bookmark text:name="Phi Copy 6"/><text:span text:style-name="T6">Phi 2:17</text:span></text:a><text:span text:style-name="T7"> </text:span></text:p>
          </table:table-cell>
          <table:table-cell table:style-name="Table2.B2" office:value-type="string">
            <text:p text:style-name="P3">Yea, and if I be offered<text:a xlink:type="simple" xlink:href="../../../Apps/Bible%20Analyzer%205.6%20Portable/bibleFN/AVs/Phi%202:17://4" text:style-name="Internet_20_link" text:visited-style-name="Visited_20_Internet_20_Link"><text:span text:style-name="T9">4</text:span></text:a> upon the sacrifice and service of your faith[<text:span text:style-name="T8">G4102</text:span>], I joy, and rejoice with you all. </text:p>
          </table:table-cell>
        </table:table-row>
        <table:table-row table:style-name="Table2.1">
          <table:table-cell table:style-name="Table2.A2" office:value-type="string">
            <text:p text:style-name="Table_20_Contents"><text:a xlink:type="simple" xlink:href="bible://AVs/Phi%203:9" text:style-name="Internet_20_link" text:visited-style-name="Visited_20_Internet_20_Link"><text:bookmark text:name="Phi Copy 7"/><text:span text:style-name="T6">Phi 3:9</text:span></text:a><text:span text:style-name="T7"> </text:span></text:p>
          </table:table-cell>
          <table:table-cell table:style-name="Table2.B2" office:value-type="string">
            <text:p text:style-name="P3">And be found in him, not having mine own righteousness, which is of the law, but that which is through the faith[<text:span text:style-name="T8">G4102</text:span>] of Christ, the righteousness which is of God by faith[<text:span text:style-name="T8">G4102</text:span>]: </text:p>
          </table:table-cell>
        </table:table-row>
        <text:soft-page-break/>
        <table:table-row table:style-name="Table2.120">
          <table:table-cell table:style-name="Table2.A2" office:value-type="string">
            <text:p text:style-name="Table_20_Contents"><text:a xlink:type="simple" xlink:href="bible://AVs/Col%201:4" text:style-name="Internet_20_link" text:visited-style-name="Visited_20_Internet_20_Link"><text:bookmark text:name="Col"/><text:span text:style-name="T6">Col 1:4</text:span></text:a><text:span text:style-name="T7"> </text:span></text:p>
          </table:table-cell>
          <table:table-cell table:style-name="Table2.B2" office:value-type="string">
            <text:p text:style-name="P3">Since we heard of your faith[<text:span text:style-name="T8">G4102</text:span>] in Christ Jesus, and of the love <text:span text:style-name="T2">which</text:span> <text:span text:style-name="T2">ye have</text:span> to all the saints, </text:p>
          </table:table-cell>
        </table:table-row>
        <table:table-row table:style-name="Table2.1">
          <table:table-cell table:style-name="Table2.A2" office:value-type="string">
            <text:p text:style-name="Table_20_Contents"><text:a xlink:type="simple" xlink:href="bible://AVs/Col%201:23" text:style-name="Internet_20_link" text:visited-style-name="Visited_20_Internet_20_Link"><text:bookmark text:name="Col Copy 7"/><text:span text:style-name="T6">Col 1:23</text:span></text:a><text:span text:style-name="T7"> </text:span></text:p>
          </table:table-cell>
          <table:table-cell table:style-name="Table2.B2" office:value-type="string">
            <text:p text:style-name="P3">If ye continue in the faith[<text:span text:style-name="T8">G4102</text:span>] grounded and settled, and <text:span text:style-name="T2">be</text:span> not moved away from the hope of the gospel, which ye have heard, <text:span text:style-name="T2">and</text:span> which was preached to every creature which is under heaven; whereof I Paul am made a minister; </text:p>
          </table:table-cell>
        </table:table-row>
        <table:table-row table:style-name="Table2.122">
          <table:table-cell table:style-name="Table2.A2" office:value-type="string">
            <text:p text:style-name="Table_20_Contents"><text:a xlink:type="simple" xlink:href="bible://AVs/Col%202:5" text:style-name="Internet_20_link" text:visited-style-name="Visited_20_Internet_20_Link"><text:bookmark text:name="Col Copy 8"/><text:span text:style-name="T6">Col 2:5</text:span></text:a><text:span text:style-name="T7"> </text:span></text:p>
          </table:table-cell>
          <table:table-cell table:style-name="Table2.B2" office:value-type="string">
            <text:p text:style-name="P3">For though I be absent in the flesh, yet am I with you in the spirit, joying and beholding your order, and the stedfastness of your faith[<text:span text:style-name="T8">G4102</text:span>] in Christ. </text:p>
          </table:table-cell>
        </table:table-row>
        <table:table-row table:style-name="Table2.1">
          <table:table-cell table:style-name="Table2.A2" office:value-type="string">
            <text:p text:style-name="Table_20_Contents"><text:a xlink:type="simple" xlink:href="bible://AVs/Col%202:7" text:style-name="Internet_20_link" text:visited-style-name="Visited_20_Internet_20_Link"><text:bookmark text:name="Col Copy 9"/><text:span text:style-name="T6">Col 2:7</text:span></text:a><text:span text:style-name="T7"> </text:span></text:p>
          </table:table-cell>
          <table:table-cell table:style-name="Table2.B2" office:value-type="string">
            <text:p text:style-name="P3">Rooted and built up in him, and stablished in the faith[<text:span text:style-name="T8">G4102</text:span>], as ye have been taught, abounding therein with thanksgiving. </text:p>
          </table:table-cell>
        </table:table-row>
        <table:table-row table:style-name="Table2.124">
          <table:table-cell table:style-name="Table2.A2" office:value-type="string">
            <text:p text:style-name="Table_20_Contents"><text:a xlink:type="simple" xlink:href="bible://AVs/Col%202:12" text:style-name="Internet_20_link" text:visited-style-name="Visited_20_Internet_20_Link"><text:bookmark text:name="Col Copy 10"/><text:span text:style-name="T6">Col 2:12</text:span></text:a><text:span text:style-name="T7"> </text:span></text:p>
          </table:table-cell>
          <table:table-cell table:style-name="Table2.B2" office:value-type="string">
            <text:p text:style-name="P3">Buried with him in baptism, wherein also ye are risen with <text:span text:style-name="T2">him</text:span> through the faith[<text:span text:style-name="T8">G4102</text:span>] of the operation of God, who hath raised him from the dead. </text:p>
          </table:table-cell>
        </table:table-row>
        <table:table-row table:style-name="Table2.1">
          <table:table-cell table:style-name="Table2.A2" office:value-type="string">
            <text:p text:style-name="Table_20_Contents"><text:a xlink:type="simple" xlink:href="bible://AVs/1Th%201:3" text:style-name="Internet_20_link" text:visited-style-name="Visited_20_Internet_20_Link"><text:bookmark text:name="1Th"/><text:span text:style-name="T6">1Th 1:3</text:span></text:a><text:span text:style-name="T7"> </text:span></text:p>
          </table:table-cell>
          <table:table-cell table:style-name="Table2.B2" office:value-type="string">
            <text:p text:style-name="P3">Remembering without ceasing your work of faith[<text:span text:style-name="T8">G4102</text:span>], and labour of love, and patience of hope in our Lord Jesus Christ, in the sight of God and our Father; </text:p>
          </table:table-cell>
        </table:table-row>
        <table:table-row table:style-name="Table2.126">
          <table:table-cell table:style-name="Table2.A2" office:value-type="string">
            <text:p text:style-name="Table_20_Contents"><text:a xlink:type="simple" xlink:href="bible://AVs/1Th%201:8" text:style-name="Internet_20_link" text:visited-style-name="Visited_20_Internet_20_Link"><text:bookmark text:name="1Th Copy 10"/><text:span text:style-name="T6">1Th 1:8</text:span></text:a><text:span text:style-name="T7"> </text:span></text:p>
          </table:table-cell>
          <table:table-cell table:style-name="Table2.B2" office:value-type="string">
            <text:p text:style-name="P3">For from you sounded out the word of the Lord not only in Macedonia and Achaia, but also in every place your faith[<text:span text:style-name="T8">G4102</text:span>] to God-ward is spread abroad; so that we need not to speak any thing. </text:p>
          </table:table-cell>
        </table:table-row>
        <table:table-row table:style-name="Table2.1">
          <table:table-cell table:style-name="Table2.A2" office:value-type="string">
            <text:p text:style-name="Table_20_Contents"><text:a xlink:type="simple" xlink:href="bible://AVs/1Th%203:2" text:style-name="Internet_20_link" text:visited-style-name="Visited_20_Internet_20_Link"><text:bookmark text:name="1Th Copy 11"/><text:span text:style-name="T6">1Th 3:2</text:span></text:a><text:span text:style-name="T7"> </text:span></text:p>
          </table:table-cell>
          <table:table-cell table:style-name="Table2.B2" office:value-type="string">
            <text:p text:style-name="P3">And sent Timotheus, our brother, and minister of God, and our fellowlabourer in the gospel of Christ, to establish you, and to comfort you concerning your faith[<text:span text:style-name="T8">G4102</text:span>]: </text:p>
          </table:table-cell>
        </table:table-row>
        <table:table-row table:style-name="Table2.128">
          <table:table-cell table:style-name="Table2.A2" office:value-type="string">
            <text:p text:style-name="Table_20_Contents"><text:a xlink:type="simple" xlink:href="bible://AVs/1Th%203:5" text:style-name="Internet_20_link" text:visited-style-name="Visited_20_Internet_20_Link"><text:bookmark text:name="1Th Copy 12"/><text:span text:style-name="T6">1Th 3:5</text:span></text:a><text:span text:style-name="T7"> </text:span></text:p>
          </table:table-cell>
          <table:table-cell table:style-name="Table2.B2" office:value-type="string">
            <text:p text:style-name="P3">For this cause, when I could no longer forbear, I sent to know your faith[<text:span text:style-name="T8">G4102</text:span>], lest by some means the tempter have tempted you, and our labour be in vain. </text:p>
          </table:table-cell>
        </table:table-row>
        <table:table-row table:style-name="Table2.1">
          <table:table-cell table:style-name="Table2.A2" office:value-type="string">
            <text:p text:style-name="Table_20_Contents"><text:a xlink:type="simple" xlink:href="bible://AVs/1Th%203:6" text:style-name="Internet_20_link" text:visited-style-name="Visited_20_Internet_20_Link"><text:bookmark text:name="1Th Copy 13"/><text:span text:style-name="T6">1Th 3:6</text:span></text:a><text:span text:style-name="T7"> </text:span></text:p>
          </table:table-cell>
          <table:table-cell table:style-name="Table2.B2" office:value-type="string">
            <text:p text:style-name="P3">But now when Timotheus came from you unto us, and brought us good tidings of your faith[<text:span text:style-name="T8">G4102</text:span>] and charity, and that ye have good remembrance of us always, desiring greatly to see us, as we also <text:span text:style-name="T2">to see</text:span> you: </text:p>
          </table:table-cell>
        </table:table-row>
        <table:table-row table:style-name="Table2.130">
          <table:table-cell table:style-name="Table2.A2" office:value-type="string">
            <text:p text:style-name="Table_20_Contents"><text:a xlink:type="simple" xlink:href="bible://AVs/1Th%203:7" text:style-name="Internet_20_link" text:visited-style-name="Visited_20_Internet_20_Link"><text:bookmark text:name="1Th Copy 14"/><text:span text:style-name="T6">1Th 3:7</text:span></text:a><text:span text:style-name="T7"> </text:span></text:p>
          </table:table-cell>
          <table:table-cell table:style-name="Table2.B2" office:value-type="string">
            <text:p text:style-name="P3">Therefore, brethren, we were comforted over you in all our affliction and distress by your faith[<text:span text:style-name="T8">G4102</text:span>]: </text:p>
          </table:table-cell>
        </table:table-row>
        <table:table-row table:style-name="Table2.1">
          <table:table-cell table:style-name="Table2.A2" office:value-type="string">
            <text:p text:style-name="Table_20_Contents"><text:a xlink:type="simple" xlink:href="bible://AVs/1Th%203:10" text:style-name="Internet_20_link" text:visited-style-name="Visited_20_Internet_20_Link"><text:bookmark text:name="1Th Copy 15"/><text:span text:style-name="T6">1Th 3:10</text:span></text:a><text:span text:style-name="T7"> </text:span></text:p>
          </table:table-cell>
          <table:table-cell table:style-name="Table2.B2" office:value-type="string">
            <text:p text:style-name="P3">Night and day praying exceedingly that we might see your face, and might perfect that which is lacking in your faith[<text:span text:style-name="T8">G4102</text:span>]? </text:p>
          </table:table-cell>
        </table:table-row>
        <table:table-row table:style-name="Table2.132">
          <table:table-cell table:style-name="Table2.A2" office:value-type="string">
            <text:p text:style-name="Table_20_Contents"><text:a xlink:type="simple" xlink:href="bible://AVs/1Th%205:8" text:style-name="Internet_20_link" text:visited-style-name="Visited_20_Internet_20_Link"><text:bookmark text:name="1Th Copy 16"/><text:span text:style-name="T6">1Th 5:8</text:span></text:a><text:span text:style-name="T7"> </text:span></text:p>
          </table:table-cell>
          <table:table-cell table:style-name="Table2.B2" office:value-type="string">
            <text:p text:style-name="P3">But let us, who are of the day, be sober, putting on the breastplate of faith[<text:span text:style-name="T8">G4102</text:span>] and love; and for an helmet, the hope of salvation. </text:p>
          </table:table-cell>
        </table:table-row>
        <table:table-row table:style-name="Table2.1">
          <table:table-cell table:style-name="Table2.A2" office:value-type="string">
            <text:p text:style-name="Table_20_Contents"><text:a xlink:type="simple" xlink:href="bible://AVs/2Th%201:3" text:style-name="Internet_20_link" text:visited-style-name="Visited_20_Internet_20_Link"><text:bookmark text:name="2Th"/><text:span text:style-name="T6">2Th 1:3</text:span></text:a><text:span text:style-name="T7"> </text:span></text:p>
          </table:table-cell>
          <table:table-cell table:style-name="Table2.B2" office:value-type="string">
            <text:p text:style-name="P3">We are bound to thank God always for you, brethren, as it is meet, because that your faith[<text:span text:style-name="T8">G4102</text:span>] groweth exceedingly, and the charity of every one of you all toward each other aboundeth; </text:p>
          </table:table-cell>
        </table:table-row>
        <table:table-row table:style-name="Table2.134">
          <table:table-cell table:style-name="Table2.A2" office:value-type="string">
            <text:p text:style-name="Table_20_Contents"><text:a xlink:type="simple" xlink:href="bible://AVs/2Th%201:4" text:style-name="Internet_20_link" text:visited-style-name="Visited_20_Internet_20_Link"><text:bookmark text:name="2Th Copy 6"/><text:span text:style-name="T6">2Th 1:4</text:span></text:a><text:span text:style-name="T7"> </text:span></text:p>
          </table:table-cell>
          <table:table-cell table:style-name="Table2.B2" office:value-type="string">
            <text:p text:style-name="P3">So that we ourselves glory in you in the churches of God for your patience and faith[<text:span text:style-name="T8">G4102</text:span>] in all your persecutions and tribulations that ye endure: </text:p>
          </table:table-cell>
        </table:table-row>
        <table:table-row table:style-name="Table2.1">
          <table:table-cell table:style-name="Table2.A2" office:value-type="string">
            <text:p text:style-name="Table_20_Contents"><text:a xlink:type="simple" xlink:href="bible://AVs/2Th%201:11" text:style-name="Internet_20_link" text:visited-style-name="Visited_20_Internet_20_Link"><text:bookmark text:name="2Th Copy 7"/><text:span text:style-name="T6">2Th 1:11</text:span></text:a><text:span text:style-name="T7"> </text:span></text:p>
          </table:table-cell>
          <table:table-cell table:style-name="Table2.B2" office:value-type="string">
            <text:p text:style-name="P3">Wherefore also we pray always for you, that our God would count<text:a xlink:type="simple" xlink:href="../../../Apps/Bible%20Analyzer%205.6%20Portable/bibleFN/AVs/2Th%201:11://3" text:style-name="Internet_20_link" text:visited-style-name="Visited_20_Internet_20_Link"><text:span text:style-name="T9">3</text:span></text:a> you worthy of <text:span text:style-name="T2">this</text:span> calling, and fulfil all the good pleasure of <text:span text:style-name="T2">his</text:span> goodness, and the work of faith[<text:span text:style-name="T8">G4102</text:span>] with power: </text:p>
          </table:table-cell>
        </table:table-row>
        <table:table-row table:style-name="Table2.136">
          <table:table-cell table:style-name="Table2.A2" office:value-type="string">
            <text:p text:style-name="Table_20_Contents"><text:a xlink:type="simple" xlink:href="bible://AVs/2Th%202:13" text:style-name="Internet_20_link" text:visited-style-name="Visited_20_Internet_20_Link"><text:bookmark text:name="2Th Copy 8"/><text:span text:style-name="T6">2Th 2:13</text:span></text:a><text:span text:style-name="T7"> </text:span></text:p>
          </table:table-cell>
          <table:table-cell table:style-name="Table2.B2" office:value-type="string">
            <text:p text:style-name="P3">But we are bound to give thanks alway to God for you, brethren beloved of the Lord, because God hath from the beginning chosen you to salvation through sanctification of the Spirit and belief[<text:span text:style-name="T8">G4102</text:span>] of the truth: </text:p>
          </table:table-cell>
        </table:table-row>
        <table:table-row table:style-name="Table2.1">
          <table:table-cell table:style-name="Table2.A2" office:value-type="string">
            <text:p text:style-name="Table_20_Contents"><text:a xlink:type="simple" xlink:href="bible://AVs/2Th%203:2" text:style-name="Internet_20_link" text:visited-style-name="Visited_20_Internet_20_Link"><text:bookmark text:name="2Th Copy 9"/><text:span text:style-name="T6">2Th 3:2</text:span></text:a><text:span text:style-name="T7"> </text:span></text:p>
          </table:table-cell>
          <table:table-cell table:style-name="Table2.B2" office:value-type="string">
            <text:p text:style-name="P3">And that we may be delivered from unreasonable<text:a xlink:type="simple" xlink:href="../../../Apps/Bible%20Analyzer%205.6%20Portable/bibleFN/AVs/2Th%203:2://2" text:style-name="Internet_20_link" text:visited-style-name="Visited_20_Internet_20_Link"><text:span text:style-name="T9">2</text:span></text:a> and wicked men: for all <text:span text:style-name="T2">men</text:span> have not faith[<text:span text:style-name="T8">G4102</text:span>]. </text:p>
          </table:table-cell>
        </table:table-row>
        <table:table-row table:style-name="Table2.138">
          <table:table-cell table:style-name="Table2.A2" office:value-type="string">
            <text:p text:style-name="Table_20_Contents"><text:a xlink:type="simple" xlink:href="bible://AVs/1Ti%201:2" text:style-name="Internet_20_link" text:visited-style-name="Visited_20_Internet_20_Link"><text:bookmark text:name="1Ti"/><text:span text:style-name="T6">1Ti 1:2</text:span></text:a><text:span text:style-name="T7"> </text:span></text:p>
          </table:table-cell>
          <table:table-cell table:style-name="Table2.B2" office:value-type="string">
            <text:p text:style-name="P3">Unto Timothy, <text:span text:style-name="T2">my</text:span> own son in the faith[<text:span text:style-name="T8">G4102</text:span>]: Grace, mercy, <text:span text:style-name="T2">and</text:span> peace, from God our Father and Jesus Christ our Lord. </text:p>
          </table:table-cell>
        </table:table-row>
        <text:soft-page-break/>
        <table:table-row table:style-name="Table2.1">
          <table:table-cell table:style-name="Table2.A2" office:value-type="string">
            <text:p text:style-name="Table_20_Contents"><text:a xlink:type="simple" xlink:href="bible://AVs/1Ti%201:4" text:style-name="Internet_20_link" text:visited-style-name="Visited_20_Internet_20_Link"><text:bookmark text:name="1Ti Copy 19"/><text:span text:style-name="T6">1Ti 1:4</text:span></text:a><text:span text:style-name="T7"> </text:span></text:p>
          </table:table-cell>
          <table:table-cell table:style-name="Table2.B2" office:value-type="string">
            <text:p text:style-name="P3">Neither give heed to fables and endless genealogies, which minister questions, rather than godly edifying which is in faith[<text:span text:style-name="T8">G4102</text:span>]: <text:span text:style-name="T2">so do</text:span>. </text:p>
          </table:table-cell>
        </table:table-row>
        <table:table-row table:style-name="Table2.140">
          <table:table-cell table:style-name="Table2.A2" office:value-type="string">
            <text:p text:style-name="Table_20_Contents"><text:a xlink:type="simple" xlink:href="bible://AVs/1Ti%201:5" text:style-name="Internet_20_link" text:visited-style-name="Visited_20_Internet_20_Link"><text:bookmark text:name="1Ti Copy 20"/><text:span text:style-name="T6">1Ti 1:5</text:span></text:a><text:span text:style-name="T7"> </text:span></text:p>
          </table:table-cell>
          <table:table-cell table:style-name="Table2.B2" office:value-type="string">
            <text:p text:style-name="P3">Now the end of the commandment is charity out of a pure heart, and <text:span text:style-name="T2">of</text:span> a good conscience, and <text:span text:style-name="T2">of</text:span> faith[<text:span text:style-name="T8">G4102</text:span>] unfeigned: </text:p>
          </table:table-cell>
        </table:table-row>
        <table:table-row table:style-name="Table2.1">
          <table:table-cell table:style-name="Table2.A2" office:value-type="string">
            <text:p text:style-name="Table_20_Contents"><text:a xlink:type="simple" xlink:href="bible://AVs/1Ti%201:14" text:style-name="Internet_20_link" text:visited-style-name="Visited_20_Internet_20_Link"><text:bookmark text:name="1Ti Copy 21"/><text:span text:style-name="T6">1Ti 1:14</text:span></text:a><text:span text:style-name="T7"> </text:span></text:p>
          </table:table-cell>
          <table:table-cell table:style-name="Table2.B2" office:value-type="string">
            <text:p text:style-name="P3">And the grace of our Lord was exceeding abundant with faith[<text:span text:style-name="T8">G4102</text:span>] and love which is in Christ Jesus. </text:p>
          </table:table-cell>
        </table:table-row>
        <table:table-row table:style-name="Table2.142">
          <table:table-cell table:style-name="Table2.A2" office:value-type="string">
            <text:p text:style-name="Table_20_Contents"><text:a xlink:type="simple" xlink:href="bible://AVs/1Ti%201:19" text:style-name="Internet_20_link" text:visited-style-name="Visited_20_Internet_20_Link"><text:bookmark text:name="1Ti Copy 22"/><text:span text:style-name="T6">1Ti 1:19</text:span></text:a><text:span text:style-name="T7"> </text:span></text:p>
          </table:table-cell>
          <table:table-cell table:style-name="Table2.B2" office:value-type="string">
            <text:p text:style-name="P3">Holding faith[<text:span text:style-name="T8">G4102</text:span>], and a good conscience; which some having put away concerning faith[<text:span text:style-name="T8">G4102</text:span>] have made shipwreck: </text:p>
          </table:table-cell>
        </table:table-row>
        <table:table-row table:style-name="Table2.1">
          <table:table-cell table:style-name="Table2.A2" office:value-type="string">
            <text:p text:style-name="Table_20_Contents"><text:a xlink:type="simple" xlink:href="bible://AVs/1Ti%202:7" text:style-name="Internet_20_link" text:visited-style-name="Visited_20_Internet_20_Link"><text:bookmark text:name="1Ti Copy 23"/><text:span text:style-name="T6">1Ti 2:7</text:span></text:a><text:span text:style-name="T7"> </text:span></text:p>
          </table:table-cell>
          <table:table-cell table:style-name="Table2.B2" office:value-type="string">
            <text:p text:style-name="P3">Whereunto I am ordained a preacher, and an apostle, (I speak the truth in Christ, <text:span text:style-name="T2">and</text:span> lie not;) a teacher of the Gentiles in faith[<text:span text:style-name="T8">G4102</text:span>] and verity. </text:p>
          </table:table-cell>
        </table:table-row>
        <table:table-row table:style-name="Table2.144">
          <table:table-cell table:style-name="Table2.A2" office:value-type="string">
            <text:p text:style-name="Table_20_Contents"><text:a xlink:type="simple" xlink:href="bible://AVs/1Ti%202:15" text:style-name="Internet_20_link" text:visited-style-name="Visited_20_Internet_20_Link"><text:bookmark text:name="1Ti Copy 24"/><text:span text:style-name="T6">1Ti 2:15</text:span></text:a><text:span text:style-name="T7"> </text:span></text:p>
          </table:table-cell>
          <table:table-cell table:style-name="Table2.B2" office:value-type="string">
            <text:p text:style-name="P3">Notwithstanding she shall be saved in childbearing, if they continue in faith[<text:span text:style-name="T8">G4102</text:span>] and charity and holiness with sobriety. </text:p>
          </table:table-cell>
        </table:table-row>
        <table:table-row table:style-name="Table2.1">
          <table:table-cell table:style-name="Table2.A2" office:value-type="string">
            <text:p text:style-name="Table_20_Contents"><text:a xlink:type="simple" xlink:href="bible://AVs/1Ti%203:9" text:style-name="Internet_20_link" text:visited-style-name="Visited_20_Internet_20_Link"><text:bookmark text:name="1Ti Copy 25"/><text:span text:style-name="T6">1Ti 3:9</text:span></text:a><text:span text:style-name="T7"> </text:span></text:p>
          </table:table-cell>
          <table:table-cell table:style-name="Table2.B2" office:value-type="string">
            <text:p text:style-name="P3">Holding the mystery of the faith[<text:span text:style-name="T8">G4102</text:span>] in a pure conscience. </text:p>
          </table:table-cell>
        </table:table-row>
        <table:table-row table:style-name="Table2.146">
          <table:table-cell table:style-name="Table2.A2" office:value-type="string">
            <text:p text:style-name="Table_20_Contents"><text:a xlink:type="simple" xlink:href="bible://AVs/1Ti%203:13" text:style-name="Internet_20_link" text:visited-style-name="Visited_20_Internet_20_Link"><text:bookmark text:name="1Ti Copy 26"/><text:span text:style-name="T6">1Ti 3:13</text:span></text:a><text:span text:style-name="T7"> </text:span></text:p>
          </table:table-cell>
          <table:table-cell table:style-name="Table2.B2" office:value-type="string">
            <text:p text:style-name="P3">For they that have used<text:a xlink:type="simple" xlink:href="../../../Apps/Bible%20Analyzer%205.6%20Portable/bibleFN/AVs/1Ti%203:13://4" text:style-name="Internet_20_link" text:visited-style-name="Visited_20_Internet_20_Link"><text:span text:style-name="T9">4</text:span></text:a> the office of a deacon well purchase to themselves a good degree, and great boldness in the faith[<text:span text:style-name="T8">G4102</text:span>] which is in Christ Jesus. </text:p>
          </table:table-cell>
        </table:table-row>
        <table:table-row table:style-name="Table2.1">
          <table:table-cell table:style-name="Table2.A2" office:value-type="string">
            <text:p text:style-name="Table_20_Contents"><text:a xlink:type="simple" xlink:href="bible://AVs/1Ti%204:1" text:style-name="Internet_20_link" text:visited-style-name="Visited_20_Internet_20_Link"><text:bookmark text:name="1Ti Copy 27"/><text:span text:style-name="T6">1Ti 4:1</text:span></text:a><text:span text:style-name="T7"> </text:span></text:p>
          </table:table-cell>
          <table:table-cell table:style-name="Table2.B2" office:value-type="string">
            <text:p text:style-name="P3">¶ Now the Spirit speaketh expressly, that in the latter times some shall depart from the faith[<text:span text:style-name="T8">G4102</text:span>], giving heed to seducing spirits, and doctrines of devils; </text:p>
          </table:table-cell>
        </table:table-row>
        <table:table-row table:style-name="Table2.148">
          <table:table-cell table:style-name="Table2.A2" office:value-type="string">
            <text:p text:style-name="Table_20_Contents"><text:a xlink:type="simple" xlink:href="bible://AVs/1Ti%204:6" text:style-name="Internet_20_link" text:visited-style-name="Visited_20_Internet_20_Link"><text:bookmark text:name="1Ti Copy 28"/><text:span text:style-name="T6">1Ti 4:6</text:span></text:a><text:span text:style-name="T7"> </text:span></text:p>
          </table:table-cell>
          <table:table-cell table:style-name="Table2.B2" office:value-type="string">
            <text:p text:style-name="P3">If thou put the brethren in remembrance of these things, thou shalt be a good minister of Jesus Christ, nourished up in the words of faith[<text:span text:style-name="T8">G4102</text:span>] and of good doctrine, whereunto thou hast attained. </text:p>
          </table:table-cell>
        </table:table-row>
        <table:table-row table:style-name="Table2.1">
          <table:table-cell table:style-name="Table2.A2" office:value-type="string">
            <text:p text:style-name="Table_20_Contents"><text:a xlink:type="simple" xlink:href="bible://AVs/1Ti%204:12" text:style-name="Internet_20_link" text:visited-style-name="Visited_20_Internet_20_Link"><text:bookmark text:name="1Ti Copy 29"/><text:span text:style-name="T6">1Ti 4:12</text:span></text:a><text:span text:style-name="T7"> </text:span></text:p>
          </table:table-cell>
          <table:table-cell table:style-name="Table2.B2" office:value-type="string">
            <text:p text:style-name="P3">Let no man despise thy youth; but be thou an example of the believers, in word, in conversation, in charity, in spirit, in faith[<text:span text:style-name="T8">G4102</text:span>], in purity. </text:p>
          </table:table-cell>
        </table:table-row>
        <table:table-row table:style-name="Table2.150">
          <table:table-cell table:style-name="Table2.A2" office:value-type="string">
            <text:p text:style-name="Table_20_Contents"><text:a xlink:type="simple" xlink:href="bible://AVs/1Ti%205:8" text:style-name="Internet_20_link" text:visited-style-name="Visited_20_Internet_20_Link"><text:bookmark text:name="1Ti Copy 30"/><text:span text:style-name="T6">1Ti 5:8</text:span></text:a><text:span text:style-name="T7"> </text:span></text:p>
          </table:table-cell>
          <table:table-cell table:style-name="Table2.B2" office:value-type="string">
            <text:p text:style-name="P3">But if any provide not for his own, and specially for those of his own house,<text:a xlink:type="simple" xlink:href="../../../Apps/Bible%20Analyzer%205.6%20Portable/bibleFN/AVs/1Ti%205:8://3" text:style-name="Internet_20_link" text:visited-style-name="Visited_20_Internet_20_Link"><text:span text:style-name="T9">3</text:span></text:a> he hath denied the faith[<text:span text:style-name="T8">G4102</text:span>], and is worse than an infidel. </text:p>
          </table:table-cell>
        </table:table-row>
        <table:table-row table:style-name="Table2.1">
          <table:table-cell table:style-name="Table2.A2" office:value-type="string">
            <text:p text:style-name="Table_20_Contents"><text:a xlink:type="simple" xlink:href="bible://AVs/1Ti%205:12" text:style-name="Internet_20_link" text:visited-style-name="Visited_20_Internet_20_Link"><text:bookmark text:name="1Ti Copy 31"/><text:span text:style-name="T6">1Ti 5:12</text:span></text:a><text:span text:style-name="T7"> </text:span></text:p>
          </table:table-cell>
          <table:table-cell table:style-name="Table2.B2" office:value-type="string">
            <text:p text:style-name="P3">Having damnation, because they have cast off their first faith[<text:span text:style-name="T8">G4102</text:span>]. </text:p>
          </table:table-cell>
        </table:table-row>
        <table:table-row table:style-name="Table2.152">
          <table:table-cell table:style-name="Table2.A2" office:value-type="string">
            <text:p text:style-name="Table_20_Contents"><text:a xlink:type="simple" xlink:href="bible://AVs/1Ti%206:10" text:style-name="Internet_20_link" text:visited-style-name="Visited_20_Internet_20_Link"><text:bookmark text:name="1Ti Copy 32"/><text:span text:style-name="T6">1Ti 6:10</text:span></text:a><text:span text:style-name="T7"> </text:span></text:p>
          </table:table-cell>
          <table:table-cell table:style-name="Table2.B2" office:value-type="string">
            <text:p text:style-name="P3">For the love of money is the root of all evil: which while some coveted after, they have erred<text:a xlink:type="simple" xlink:href="../../../Apps/Bible%20Analyzer%205.6%20Portable/bibleFN/AVs/1Ti%206:10://5" text:style-name="Internet_20_link" text:visited-style-name="Visited_20_Internet_20_Link"><text:span text:style-name="T9">5</text:span></text:a> from the faith[<text:span text:style-name="T8">G4102</text:span>], and pierced themselves through with many sorrows. </text:p>
          </table:table-cell>
        </table:table-row>
        <table:table-row table:style-name="Table2.1">
          <table:table-cell table:style-name="Table2.A2" office:value-type="string">
            <text:p text:style-name="Table_20_Contents"><text:a xlink:type="simple" xlink:href="bible://AVs/1Ti%206:11" text:style-name="Internet_20_link" text:visited-style-name="Visited_20_Internet_20_Link"><text:bookmark text:name="1Ti Copy 33"/><text:span text:style-name="T6">1Ti 6:11</text:span></text:a><text:span text:style-name="T7"> </text:span></text:p>
          </table:table-cell>
          <table:table-cell table:style-name="Table2.B2" office:value-type="string">
            <text:p text:style-name="P3">But thou, O man of God, flee these things; and follow after righteousness, godliness, faith[<text:span text:style-name="T8">G4102</text:span>], love, patience, meekness. </text:p>
          </table:table-cell>
        </table:table-row>
        <table:table-row table:style-name="Table2.154">
          <table:table-cell table:style-name="Table2.A2" office:value-type="string">
            <text:p text:style-name="Table_20_Contents"><text:a xlink:type="simple" xlink:href="bible://AVs/1Ti%206:12" text:style-name="Internet_20_link" text:visited-style-name="Visited_20_Internet_20_Link"><text:bookmark text:name="1Ti Copy 34"/><text:span text:style-name="T6">1Ti 6:12</text:span></text:a><text:span text:style-name="T7"> </text:span></text:p>
          </table:table-cell>
          <table:table-cell table:style-name="Table2.B2" office:value-type="string">
            <text:p text:style-name="P3">Fight the good fight of faith[<text:span text:style-name="T8">G4102</text:span>], lay hold on eternal life, whereunto thou art also called, and hast professed a good profession before many witnesses. </text:p>
          </table:table-cell>
        </table:table-row>
        <table:table-row table:style-name="Table2.1">
          <table:table-cell table:style-name="Table2.A2" office:value-type="string">
            <text:p text:style-name="Table_20_Contents"><text:a xlink:type="simple" xlink:href="bible://AVs/1Ti%206:21" text:style-name="Internet_20_link" text:visited-style-name="Visited_20_Internet_20_Link"><text:bookmark text:name="1Ti Copy 35"/><text:span text:style-name="T6">1Ti 6:21</text:span></text:a><text:span text:style-name="T7"> </text:span></text:p>
          </table:table-cell>
          <table:table-cell table:style-name="Table2.B2" office:value-type="string">
            <text:p text:style-name="P3">Which some professing have erred concerning the faith[<text:span text:style-name="T8">G4102</text:span>]. Grace <text:span text:style-name="T2">be</text:span> with thee. Amen. (The first to Timothy was written from Laodicea, which is the chiefest city of Phrygia Pacatiana.) </text:p>
          </table:table-cell>
        </table:table-row>
        <table:table-row table:style-name="Table2.156">
          <table:table-cell table:style-name="Table2.A2" office:value-type="string">
            <text:p text:style-name="Table_20_Contents"><text:a xlink:type="simple" xlink:href="bible://AVs/2Ti%201:5" text:style-name="Internet_20_link" text:visited-style-name="Visited_20_Internet_20_Link"><text:bookmark text:name="2Ti"/><text:span text:style-name="T6">2Ti 1:5</text:span></text:a><text:span text:style-name="T7"> </text:span></text:p>
          </table:table-cell>
          <table:table-cell table:style-name="Table2.B2" office:value-type="string">
            <text:p text:style-name="P3">When I call to remembrance the unfeigned faith[<text:span text:style-name="T8">G4102</text:span>] that is in thee, which dwelt first in thy grandmother Lois, and thy mother Eunice; and I am persuaded that in thee also. </text:p>
          </table:table-cell>
        </table:table-row>
        <table:table-row table:style-name="Table2.1">
          <table:table-cell table:style-name="Table2.A2" office:value-type="string">
            <text:p text:style-name="Table_20_Contents"><text:a xlink:type="simple" xlink:href="bible://AVs/2Ti%201:13" text:style-name="Internet_20_link" text:visited-style-name="Visited_20_Internet_20_Link"><text:bookmark text:name="2Ti Copy 8"/><text:span text:style-name="T6">2Ti 1:13</text:span></text:a><text:span text:style-name="T7"> </text:span></text:p>
          </table:table-cell>
          <table:table-cell table:style-name="Table2.B2" office:value-type="string">
            <text:p text:style-name="P3">Hold fast the form of sound words, which thou hast heard of me, in faith[<text:span text:style-name="T8">G4102</text:span>] and love which is in Christ Jesus. </text:p>
          </table:table-cell>
        </table:table-row>
        <table:table-row table:style-name="Table2.158">
          <table:table-cell table:style-name="Table2.A2" office:value-type="string">
            <text:p text:style-name="Table_20_Contents"><text:a xlink:type="simple" xlink:href="bible://AVs/2Ti%202:18" text:style-name="Internet_20_link" text:visited-style-name="Visited_20_Internet_20_Link"><text:bookmark text:name="2Ti Copy 9"/><text:span text:style-name="T6">2Ti 2:18</text:span></text:a><text:span text:style-name="T7"> </text:span></text:p>
          </table:table-cell>
          <table:table-cell table:style-name="Table2.B2" office:value-type="string">
            <text:p text:style-name="P3">Who concerning the truth have erred, saying that the resurrection is past already; and overthrow the faith[<text:span text:style-name="T8">G4102</text:span>] of some. </text:p>
          </table:table-cell>
        </table:table-row>
        <table:table-row table:style-name="Table2.1">
          <table:table-cell table:style-name="Table2.A2" office:value-type="string">
            <text:p text:style-name="Table_20_Contents"><text:a xlink:type="simple" xlink:href="bible://AVs/2Ti%202:22" text:style-name="Internet_20_link" text:visited-style-name="Visited_20_Internet_20_Link"><text:bookmark text:name="2Ti Copy 10"/><text:span text:style-name="T6">2Ti 2:22</text:span></text:a><text:span text:style-name="T7"> </text:span></text:p>
          </table:table-cell>
          <table:table-cell table:style-name="Table2.B2" office:value-type="string">
            <text:p text:style-name="P3">Flee also youthful lusts: but follow righteousness, faith[<text:span text:style-name="T8">G4102</text:span>], charity, peace, with them that call on the Lord out of a pure heart. </text:p>
          </table:table-cell>
        </table:table-row>
        <text:soft-page-break/>
        <table:table-row table:style-name="Table2.160">
          <table:table-cell table:style-name="Table2.A2" office:value-type="string">
            <text:p text:style-name="Table_20_Contents"><text:a xlink:type="simple" xlink:href="bible://AVs/2Ti%203:8" text:style-name="Internet_20_link" text:visited-style-name="Visited_20_Internet_20_Link"><text:bookmark text:name="2Ti Copy 11"/><text:span text:style-name="T6">2Ti 3:8</text:span></text:a><text:span text:style-name="T7"> </text:span></text:p>
          </table:table-cell>
          <table:table-cell table:style-name="Table2.B2" office:value-type="string">
            <text:p text:style-name="P3">Now as Jannes and Jambres withstood Moses, so do these also resist the truth: men of corrupt minds, reprobate<text:a xlink:type="simple" xlink:href="../../../Apps/Bible%20Analyzer%205.6%20Portable/bibleFN/AVs/2Ti%203:8://2" text:style-name="Internet_20_link" text:visited-style-name="Visited_20_Internet_20_Link"><text:span text:style-name="T9">2</text:span></text:a> concerning the faith[<text:span text:style-name="T8">G4102</text:span>]. </text:p>
          </table:table-cell>
        </table:table-row>
        <table:table-row table:style-name="Table2.1">
          <table:table-cell table:style-name="Table2.A2" office:value-type="string">
            <text:p text:style-name="Table_20_Contents"><text:a xlink:type="simple" xlink:href="bible://AVs/2Ti%203:10" text:style-name="Internet_20_link" text:visited-style-name="Visited_20_Internet_20_Link"><text:bookmark text:name="2Ti Copy 12"/><text:span text:style-name="T6">2Ti 3:10</text:span></text:a><text:span text:style-name="T7"> </text:span></text:p>
          </table:table-cell>
          <table:table-cell table:style-name="Table2.B2" office:value-type="string">
            <text:p text:style-name="P3">But thou hast fully<text:a xlink:type="simple" xlink:href="../../../Apps/Bible%20Analyzer%205.6%20Portable/bibleFN/AVs/2Ti%203:10://3" text:style-name="Internet_20_link" text:visited-style-name="Visited_20_Internet_20_Link"><text:span text:style-name="T9">3</text:span></text:a> known my doctrine, manner of life, purpose, faith[<text:span text:style-name="T8">G4102</text:span>], longsuffering, charity, patience, </text:p>
          </table:table-cell>
        </table:table-row>
        <table:table-row table:style-name="Table2.162">
          <table:table-cell table:style-name="Table2.A2" office:value-type="string">
            <text:p text:style-name="Table_20_Contents"><text:a xlink:type="simple" xlink:href="bible://AVs/2Ti%203:15" text:style-name="Internet_20_link" text:visited-style-name="Visited_20_Internet_20_Link"><text:bookmark text:name="2Ti Copy 13"/><text:span text:style-name="T6">2Ti 3:15</text:span></text:a><text:span text:style-name="T7"> </text:span></text:p>
          </table:table-cell>
          <table:table-cell table:style-name="Table2.B2" office:value-type="string">
            <text:p text:style-name="P3">And that from a child thou hast known the holy scriptures, which are able to make thee wise unto salvation through faith[<text:span text:style-name="T8">G4102</text:span>] which is in Christ Jesus. </text:p>
          </table:table-cell>
        </table:table-row>
        <table:table-row table:style-name="Table2.1">
          <table:table-cell table:style-name="Table2.A2" office:value-type="string">
            <text:p text:style-name="Table_20_Contents"><text:a xlink:type="simple" xlink:href="bible://AVs/2Ti%204:7" text:style-name="Internet_20_link" text:visited-style-name="Visited_20_Internet_20_Link"><text:bookmark text:name="2Ti Copy 14"/><text:span text:style-name="T6">2Ti 4:7</text:span></text:a><text:span text:style-name="T7"> </text:span></text:p>
          </table:table-cell>
          <table:table-cell table:style-name="Table2.B2" office:value-type="string">
            <text:p text:style-name="P3">I have fought a good fight, I have finished <text:span text:style-name="T2">my</text:span> course, I have kept the faith[<text:span text:style-name="T8">G4102</text:span>]: </text:p>
          </table:table-cell>
        </table:table-row>
        <table:table-row table:style-name="Table2.164">
          <table:table-cell table:style-name="Table2.A2" office:value-type="string">
            <text:p text:style-name="Table_20_Contents"><text:a xlink:type="simple" xlink:href="bible://AVs/Tit%201:1" text:style-name="Internet_20_link" text:visited-style-name="Visited_20_Internet_20_Link"><text:bookmark text:name="Tit"/><text:span text:style-name="T6">Tit 1:1</text:span></text:a><text:span text:style-name="T7"> </text:span></text:p>
          </table:table-cell>
          <table:table-cell table:style-name="Table2.B2" office:value-type="string">
            <text:p text:style-name="P3">¶ Paul, a servant of God, and an apostle of Jesus Christ, according to the faith[<text:span text:style-name="T8">G4102</text:span>] of God's elect, and the acknowledging of the truth which is after godliness; </text:p>
          </table:table-cell>
        </table:table-row>
        <table:table-row table:style-name="Table2.1">
          <table:table-cell table:style-name="Table2.A2" office:value-type="string">
            <text:p text:style-name="Table_20_Contents"><text:a xlink:type="simple" xlink:href="bible://AVs/Tit%201:4" text:style-name="Internet_20_link" text:visited-style-name="Visited_20_Internet_20_Link"><text:bookmark text:name="Tit Copy 9"/><text:span text:style-name="T6">Tit 1:4</text:span></text:a><text:span text:style-name="T7"> </text:span></text:p>
          </table:table-cell>
          <table:table-cell table:style-name="Table2.B2" office:value-type="string">
            <text:p text:style-name="P3">To Titus, <text:span text:style-name="T2">mine</text:span> own son after the common faith[<text:span text:style-name="T8">G4102</text:span>]: Grace, mercy, <text:span text:style-name="T2">and</text:span> peace, from God the Father and the Lord Jesus Christ our Saviour. </text:p>
          </table:table-cell>
        </table:table-row>
        <table:table-row table:style-name="Table2.166">
          <table:table-cell table:style-name="Table2.A2" office:value-type="string">
            <text:p text:style-name="Table_20_Contents"><text:a xlink:type="simple" xlink:href="bible://AVs/Tit%201:13" text:style-name="Internet_20_link" text:visited-style-name="Visited_20_Internet_20_Link"><text:bookmark text:name="Tit Copy 10"/><text:span text:style-name="T6">Tit 1:13</text:span></text:a><text:span text:style-name="T7"> </text:span></text:p>
          </table:table-cell>
          <table:table-cell table:style-name="Table2.B2" office:value-type="string">
            <text:p text:style-name="P3">This witness is true. Wherefore rebuke them sharply, that they may be sound in the faith[<text:span text:style-name="T8">G4102</text:span>]; </text:p>
          </table:table-cell>
        </table:table-row>
        <table:table-row table:style-name="Table2.1">
          <table:table-cell table:style-name="Table2.A2" office:value-type="string">
            <text:p text:style-name="Table_20_Contents"><text:a xlink:type="simple" xlink:href="bible://AVs/Tit%202:2" text:style-name="Internet_20_link" text:visited-style-name="Visited_20_Internet_20_Link"><text:bookmark text:name="Tit Copy 11"/><text:span text:style-name="T6">Tit 2:2</text:span></text:a><text:span text:style-name="T7"> </text:span></text:p>
          </table:table-cell>
          <table:table-cell table:style-name="Table2.B2" office:value-type="string">
            <text:p text:style-name="P3">That the aged men be sober,<text:a xlink:type="simple" xlink:href="../../../Apps/Bible%20Analyzer%205.6%20Portable/bibleFN/AVs/Tit%202:2://1" text:style-name="Internet_20_link" text:visited-style-name="Visited_20_Internet_20_Link"><text:span text:style-name="T9">1</text:span></text:a> grave, temperate, sound in faith[<text:span text:style-name="T8">G4102</text:span>], in charity, in patience. </text:p>
          </table:table-cell>
        </table:table-row>
        <table:table-row table:style-name="Table2.168">
          <table:table-cell table:style-name="Table2.A2" office:value-type="string">
            <text:p text:style-name="Table_20_Contents"><text:a xlink:type="simple" xlink:href="bible://AVs/Tit%202:10" text:style-name="Internet_20_link" text:visited-style-name="Visited_20_Internet_20_Link"><text:bookmark text:name="Tit Copy 12"/><text:span text:style-name="T6">Tit 2:10</text:span></text:a><text:span text:style-name="T7"> </text:span></text:p>
          </table:table-cell>
          <table:table-cell table:style-name="Table2.B2" office:value-type="string">
            <text:p text:style-name="P3">Not purloining, but shewing all good fidelity[<text:span text:style-name="T8">G4102</text:span>]; that they may adorn the doctrine of God our Saviour in all things. </text:p>
          </table:table-cell>
        </table:table-row>
        <table:table-row table:style-name="Table2.1">
          <table:table-cell table:style-name="Table2.A2" office:value-type="string">
            <text:p text:style-name="Table_20_Contents"><text:a xlink:type="simple" xlink:href="bible://AVs/Tit%203:15" text:style-name="Internet_20_link" text:visited-style-name="Visited_20_Internet_20_Link"><text:bookmark text:name="Tit Copy 13"/><text:span text:style-name="T6">Tit 3:15</text:span></text:a><text:span text:style-name="T7"> </text:span></text:p>
          </table:table-cell>
          <table:table-cell table:style-name="Table2.B2" office:value-type="string">
            <text:p text:style-name="P3">All that are with me salute thee. Greet them that love us in the faith[<text:span text:style-name="T8">G4102</text:span>]. Grace <text:span text:style-name="T2">be</text:span> with you all. Amen. (It was written to Titus, ordained the first bishop of the church of the Cretians, from Nicopolis of Macedonia.) </text:p>
          </table:table-cell>
        </table:table-row>
        <table:table-row table:style-name="Table2.170">
          <table:table-cell table:style-name="Table2.A2" office:value-type="string">
            <text:p text:style-name="Table_20_Contents"><text:a xlink:type="simple" xlink:href="bible://AVs/Phm%201:5" text:style-name="Internet_20_link" text:visited-style-name="Visited_20_Internet_20_Link"><text:bookmark text:name="Phm"/><text:span text:style-name="T6">Phm 1:5</text:span></text:a><text:span text:style-name="T7"> </text:span></text:p>
          </table:table-cell>
          <table:table-cell table:style-name="Table2.B2" office:value-type="string">
            <text:p text:style-name="P3">Hearing of thy love and faith[<text:span text:style-name="T8">G4102</text:span>], which thou hast toward the Lord Jesus, and toward all saints; </text:p>
          </table:table-cell>
        </table:table-row>
        <table:table-row table:style-name="Table2.1">
          <table:table-cell table:style-name="Table2.A2" office:value-type="string">
            <text:p text:style-name="Table_20_Contents"><text:a xlink:type="simple" xlink:href="bible://AVs/Phm%201:6" text:style-name="Internet_20_link" text:visited-style-name="Visited_20_Internet_20_Link"><text:bookmark text:name="Phm Copy 2"/><text:span text:style-name="T6">Phm 1:6</text:span></text:a><text:span text:style-name="T7"> </text:span></text:p>
          </table:table-cell>
          <table:table-cell table:style-name="Table2.B2" office:value-type="string">
            <text:p text:style-name="P3">That the communication of thy faith[<text:span text:style-name="T8">G4102</text:span>] may become effectual by the acknowledging of every good thing which is in you in Christ Jesus. </text:p>
          </table:table-cell>
        </table:table-row>
        <table:table-row table:style-name="Table2.172">
          <table:table-cell table:style-name="Table2.A2" office:value-type="string">
            <text:p text:style-name="Table_20_Contents"><text:a xlink:type="simple" xlink:href="bible://AVs/Heb%204:2" text:style-name="Internet_20_link" text:visited-style-name="Visited_20_Internet_20_Link"><text:bookmark text:name="Heb"/><text:span text:style-name="T6">Heb 4:2</text:span></text:a><text:span text:style-name="T7"> </text:span></text:p>
          </table:table-cell>
          <table:table-cell table:style-name="Table2.B2" office:value-type="string">
            <text:p text:style-name="P3">For unto us was the gospel preached, as well as unto them: but the word preached<text:a xlink:type="simple" xlink:href="../../../Apps/Bible%20Analyzer%205.6%20Portable/bibleFN/AVs/Heb%204:2://1" text:style-name="Internet_20_link" text:visited-style-name="Visited_20_Internet_20_Link"><text:span text:style-name="T9">1</text:span></text:a> did not profit them, not<text:a xlink:type="simple" xlink:href="../../../Apps/Bible%20Analyzer%205.6%20Portable/bibleFN/AVs/Heb%204:2://2" text:style-name="Internet_20_link" text:visited-style-name="Visited_20_Internet_20_Link"><text:span text:style-name="T9">2</text:span></text:a> being mixed with faith[<text:span text:style-name="T8">G4102</text:span>] in them that heard <text:span text:style-name="T2">it</text:span>. </text:p>
          </table:table-cell>
        </table:table-row>
        <table:table-row table:style-name="Table2.1">
          <table:table-cell table:style-name="Table2.A2" office:value-type="string">
            <text:p text:style-name="Table_20_Contents"><text:a xlink:type="simple" xlink:href="bible://AVs/Heb%206:1" text:style-name="Internet_20_link" text:visited-style-name="Visited_20_Internet_20_Link"><text:bookmark text:name="Heb Copy 36"/><text:span text:style-name="T6">Heb 6:1</text:span></text:a><text:span text:style-name="T7"> </text:span></text:p>
          </table:table-cell>
          <table:table-cell table:style-name="Table2.B2" office:value-type="string">
            <text:p text:style-name="P3">¶ Therefore leaving the principles<text:a xlink:type="simple" xlink:href="../../../Apps/Bible%20Analyzer%205.6%20Portable/bibleFN/AVs/Heb%206:1://1" text:style-name="Internet_20_link" text:visited-style-name="Visited_20_Internet_20_Link"><text:span text:style-name="T9">1</text:span></text:a> of the doctrine of Christ, let us go on unto perfection; not laying again the foundation of repentance from dead works, and of faith[<text:span text:style-name="T8">G4102</text:span>] toward God, </text:p>
          </table:table-cell>
        </table:table-row>
        <table:table-row table:style-name="Table2.174">
          <table:table-cell table:style-name="Table2.A2" office:value-type="string">
            <text:p text:style-name="Table_20_Contents"><text:a xlink:type="simple" xlink:href="bible://AVs/Heb%206:12" text:style-name="Internet_20_link" text:visited-style-name="Visited_20_Internet_20_Link"><text:bookmark text:name="Heb Copy 37"/><text:span text:style-name="T6">Heb 6:12</text:span></text:a><text:span text:style-name="T7"> </text:span></text:p>
          </table:table-cell>
          <table:table-cell table:style-name="Table2.B2" office:value-type="string">
            <text:p text:style-name="P3">That ye be not slothful, but followers of them who through faith[<text:span text:style-name="T8">G4102</text:span>] and patience inherit the promises. </text:p>
          </table:table-cell>
        </table:table-row>
        <table:table-row table:style-name="Table2.1">
          <table:table-cell table:style-name="Table2.A2" office:value-type="string">
            <text:p text:style-name="Table_20_Contents"><text:a xlink:type="simple" xlink:href="bible://AVs/Heb%2010:22" text:style-name="Internet_20_link" text:visited-style-name="Visited_20_Internet_20_Link"><text:bookmark text:name="Heb Copy 38"/><text:span text:style-name="T6">Heb 10:22</text:span></text:a><text:span text:style-name="T7"> </text:span></text:p>
          </table:table-cell>
          <table:table-cell table:style-name="Table2.B2" office:value-type="string">
            <text:p text:style-name="P3">Let us draw near with a true heart in full assurance of faith[<text:span text:style-name="T8">G4102</text:span>], having our hearts sprinkled from an evil conscience, and our bodies washed with pure water. </text:p>
          </table:table-cell>
        </table:table-row>
        <table:table-row table:style-name="Table2.176">
          <table:table-cell table:style-name="Table2.A2" office:value-type="string">
            <text:p text:style-name="Table_20_Contents"><text:a xlink:type="simple" xlink:href="bible://AVs/Heb%2010:38" text:style-name="Internet_20_link" text:visited-style-name="Visited_20_Internet_20_Link"><text:bookmark text:name="Heb Copy 39"/><text:span text:style-name="T6">Heb 10:38</text:span></text:a><text:span text:style-name="T7"> </text:span></text:p>
          </table:table-cell>
          <table:table-cell table:style-name="Table2.B2" office:value-type="string">
            <text:p text:style-name="P3">Now the just shall live by faith[<text:span text:style-name="T8">G4102</text:span>]: but if <text:span text:style-name="T2">any man</text:span> draw back, my soul shall have no pleasure in him. </text:p>
          </table:table-cell>
        </table:table-row>
        <table:table-row table:style-name="Table2.1">
          <table:table-cell table:style-name="Table2.A2" office:value-type="string">
            <text:p text:style-name="Table_20_Contents"><text:a xlink:type="simple" xlink:href="bible://AVs/Heb%2010:39" text:style-name="Internet_20_link" text:visited-style-name="Visited_20_Internet_20_Link"><text:bookmark text:name="Heb Copy 40"/><text:span text:style-name="T6">Heb 10:39</text:span></text:a><text:span text:style-name="T7"> </text:span></text:p>
          </table:table-cell>
          <table:table-cell table:style-name="Table2.B2" office:value-type="string">
            <text:p text:style-name="P3">But we are not of them who draw back unto perdition; but of them that believe[<text:span text:style-name="T8">G4102</text:span>] to the saving of the soul. </text:p>
          </table:table-cell>
        </table:table-row>
        <table:table-row table:style-name="Table2.178">
          <table:table-cell table:style-name="Table2.A2" office:value-type="string">
            <text:p text:style-name="Table_20_Contents"><text:a xlink:type="simple" xlink:href="bible://AVs/Heb%2011:1" text:style-name="Internet_20_link" text:visited-style-name="Visited_20_Internet_20_Link"><text:bookmark text:name="Heb Copy 41"/><text:span text:style-name="T6">Heb 11:1</text:span></text:a><text:span text:style-name="T7"> </text:span></text:p>
          </table:table-cell>
          <table:table-cell table:style-name="Table2.B2" office:value-type="string">
            <text:p text:style-name="P3">¶ Now faith[<text:span text:style-name="T8">G4102</text:span>] is the substance<text:a xlink:type="simple" xlink:href="../../../Apps/Bible%20Analyzer%205.6%20Portable/bibleFN/AVs/Heb%2011:1://1" text:style-name="Internet_20_link" text:visited-style-name="Visited_20_Internet_20_Link"><text:span text:style-name="T9">1</text:span></text:a> of things hoped for, the evidence of things not seen. </text:p>
          </table:table-cell>
        </table:table-row>
        <table:table-row table:style-name="Table2.1">
          <table:table-cell table:style-name="Table2.A2" office:value-type="string">
            <text:p text:style-name="Table_20_Contents"><text:a xlink:type="simple" xlink:href="bible://AVs/Heb%2011:3" text:style-name="Internet_20_link" text:visited-style-name="Visited_20_Internet_20_Link"><text:bookmark text:name="Heb Copy 42"/><text:span text:style-name="T6">Heb 11:3</text:span></text:a><text:span text:style-name="T7"> </text:span></text:p>
          </table:table-cell>
          <table:table-cell table:style-name="Table2.B2" office:value-type="string">
            <text:p text:style-name="P3">Through faith[<text:span text:style-name="T8">G4102</text:span>] we understand that the worlds were framed by the word of God, so that things which are seen were not made of things which do appear. </text:p>
          </table:table-cell>
        </table:table-row>
        <table:table-row table:style-name="Table2.180">
          <table:table-cell table:style-name="Table2.A2" office:value-type="string">
            <text:p text:style-name="Table_20_Contents"><text:a xlink:type="simple" xlink:href="bible://AVs/Heb%2011:4" text:style-name="Internet_20_link" text:visited-style-name="Visited_20_Internet_20_Link"><text:bookmark text:name="Heb Copy 43"/><text:span text:style-name="T6">Heb 11:4</text:span></text:a><text:span text:style-name="T7"> </text:span></text:p>
          </table:table-cell>
          <table:table-cell table:style-name="Table2.B2" office:value-type="string">
            <text:p text:style-name="P3">By faith[<text:span text:style-name="T8">G4102</text:span>] Abel offered unto God a more excellent sacrifice than Cain, by which he obtained witness that he was righteous, God testifying of his gifts: and by it he being dead yet<text:a xlink:type="simple" xlink:href="../../../Apps/Bible%20Analyzer%205.6%20Portable/bibleFN/AVs/Heb%2011:4://2" text:style-name="Internet_20_link" text:visited-style-name="Visited_20_Internet_20_Link"><text:span text:style-name="T9">2</text:span></text:a> speaketh. </text:p>
          </table:table-cell>
        </table:table-row>
        <text:soft-page-break/>
        <table:table-row table:style-name="Table2.1">
          <table:table-cell table:style-name="Table2.A2" office:value-type="string">
            <text:p text:style-name="Table_20_Contents"><text:a xlink:type="simple" xlink:href="bible://AVs/Heb%2011:5" text:style-name="Internet_20_link" text:visited-style-name="Visited_20_Internet_20_Link"><text:bookmark text:name="Heb Copy 44"/><text:span text:style-name="T6">Heb 11:5</text:span></text:a><text:span text:style-name="T7"> </text:span></text:p>
          </table:table-cell>
          <table:table-cell table:style-name="Table2.B2" office:value-type="string">
            <text:p text:style-name="P3">By faith[<text:span text:style-name="T8">G4102</text:span>] Enoch was translated that he should not see death; and was not found, because God had translated him: for before his translation he had this testimony, that he pleased God. </text:p>
          </table:table-cell>
        </table:table-row>
        <table:table-row table:style-name="Table2.182">
          <table:table-cell table:style-name="Table2.A2" office:value-type="string">
            <text:p text:style-name="Table_20_Contents"><text:a xlink:type="simple" xlink:href="bible://AVs/Heb%2011:6" text:style-name="Internet_20_link" text:visited-style-name="Visited_20_Internet_20_Link"><text:bookmark text:name="Heb Copy 45"/><text:span text:style-name="T6">Heb 11:6</text:span></text:a><text:span text:style-name="T7"> </text:span></text:p>
          </table:table-cell>
          <table:table-cell table:style-name="Table2.B2" office:value-type="string">
            <text:p text:style-name="P3">But without faith[<text:span text:style-name="T8">G4102</text:span>] <text:span text:style-name="T2">it is</text:span> impossible to please <text:span text:style-name="T2">him</text:span>: for he that cometh to God must believe that he is, and <text:span text:style-name="T2">that</text:span> he is a rewarder of them that diligently seek him. </text:p>
          </table:table-cell>
        </table:table-row>
        <table:table-row table:style-name="Table2.1">
          <table:table-cell table:style-name="Table2.A2" office:value-type="string">
            <text:p text:style-name="Table_20_Contents"><text:a xlink:type="simple" xlink:href="bible://AVs/Heb%2011:7" text:style-name="Internet_20_link" text:visited-style-name="Visited_20_Internet_20_Link"><text:bookmark text:name="Heb Copy 46"/><text:span text:style-name="T6">Heb 11:7</text:span></text:a><text:span text:style-name="T7"> </text:span></text:p>
          </table:table-cell>
          <table:table-cell table:style-name="Table2.B2" office:value-type="string">
            <text:p text:style-name="P3">By faith[<text:span text:style-name="T8">G4102</text:span>] Noah, being warned of God of things not seen as yet, moved<text:a xlink:type="simple" xlink:href="../../../Apps/Bible%20Analyzer%205.6%20Portable/bibleFN/AVs/Heb%2011:7://3" text:style-name="Internet_20_link" text:visited-style-name="Visited_20_Internet_20_Link"><text:span text:style-name="T9">3</text:span></text:a> with fear, prepared an ark to the saving of his house; by the which he condemned the world, and became heir of the righteousness which is by faith[<text:span text:style-name="T8">G4102</text:span>]. </text:p>
          </table:table-cell>
        </table:table-row>
        <table:table-row table:style-name="Table2.184">
          <table:table-cell table:style-name="Table2.A2" office:value-type="string">
            <text:p text:style-name="Table_20_Contents"><text:a xlink:type="simple" xlink:href="bible://AVs/Heb%2011:8" text:style-name="Internet_20_link" text:visited-style-name="Visited_20_Internet_20_Link"><text:bookmark text:name="Heb Copy 47"/><text:span text:style-name="T6">Heb 11:8</text:span></text:a><text:span text:style-name="T7"> </text:span></text:p>
          </table:table-cell>
          <table:table-cell table:style-name="Table2.B2" office:value-type="string">
            <text:p text:style-name="P3">By faith[<text:span text:style-name="T8">G4102</text:span>] Abraham, when he was called to go out into a place which he should after receive for an inheritance, obeyed; and he went out, not knowing whither he went. </text:p>
          </table:table-cell>
        </table:table-row>
        <table:table-row table:style-name="Table2.1">
          <table:table-cell table:style-name="Table2.A2" office:value-type="string">
            <text:p text:style-name="Table_20_Contents"><text:a xlink:type="simple" xlink:href="bible://AVs/Heb%2011:9" text:style-name="Internet_20_link" text:visited-style-name="Visited_20_Internet_20_Link"><text:bookmark text:name="Heb Copy 48"/><text:span text:style-name="T6">Heb 11:9</text:span></text:a><text:span text:style-name="T7"> </text:span></text:p>
          </table:table-cell>
          <table:table-cell table:style-name="Table2.B2" office:value-type="string">
            <text:p text:style-name="P3">By faith[<text:span text:style-name="T8">G4102</text:span>] he sojourned in the land of promise, as <text:span text:style-name="T2">in</text:span> a strange country, dwelling in tabernacles with Isaac and Jacob, the heirs with him of the same promise: </text:p>
          </table:table-cell>
        </table:table-row>
        <table:table-row table:style-name="Table2.186">
          <table:table-cell table:style-name="Table2.A2" office:value-type="string">
            <text:p text:style-name="Table_20_Contents"><text:a xlink:type="simple" xlink:href="bible://AVs/Heb%2011:11" text:style-name="Internet_20_link" text:visited-style-name="Visited_20_Internet_20_Link"><text:bookmark text:name="Heb Copy 49"/><text:span text:style-name="T6">Heb 11:11</text:span></text:a><text:span text:style-name="T7"> </text:span></text:p>
          </table:table-cell>
          <table:table-cell table:style-name="Table2.B2" office:value-type="string">
            <text:p text:style-name="P3">Through faith[<text:span text:style-name="T8">G4102</text:span>] also Sara herself received strength to conceive seed, and was delivered of a child when she was past age, because she judged him faithful who had promised. </text:p>
          </table:table-cell>
        </table:table-row>
        <table:table-row table:style-name="Table2.1">
          <table:table-cell table:style-name="Table2.A2" office:value-type="string">
            <text:p text:style-name="Table_20_Contents"><text:a xlink:type="simple" xlink:href="bible://AVs/Heb%2011:13" text:style-name="Internet_20_link" text:visited-style-name="Visited_20_Internet_20_Link"><text:bookmark text:name="Heb Copy 50"/><text:span text:style-name="T6">Heb 11:13</text:span></text:a><text:span text:style-name="T7"> </text:span></text:p>
          </table:table-cell>
          <table:table-cell table:style-name="Table2.B2" office:value-type="string">
            <text:p text:style-name="P3">These all died in<text:a xlink:type="simple" xlink:href="../../../Apps/Bible%20Analyzer%205.6%20Portable/bibleFN/AVs/Heb%2011:13://4" text:style-name="Internet_20_link" text:visited-style-name="Visited_20_Internet_20_Link"><text:span text:style-name="T9">4</text:span></text:a> faith[<text:span text:style-name="T8">G4102</text:span>], not having received the promises, but having seen them afar off, and were persuaded of <text:span text:style-name="T2">them</text:span>, and embraced <text:span text:style-name="T2">them</text:span>, and confessed that they were strangers and pilgrims on the earth. </text:p>
          </table:table-cell>
        </table:table-row>
        <table:table-row table:style-name="Table2.188">
          <table:table-cell table:style-name="Table2.A2" office:value-type="string">
            <text:p text:style-name="Table_20_Contents"><text:a xlink:type="simple" xlink:href="bible://AVs/Heb%2011:17" text:style-name="Internet_20_link" text:visited-style-name="Visited_20_Internet_20_Link"><text:bookmark text:name="Heb Copy 51"/><text:span text:style-name="T6">Heb 11:17</text:span></text:a><text:span text:style-name="T7"> </text:span></text:p>
          </table:table-cell>
          <table:table-cell table:style-name="Table2.B2" office:value-type="string">
            <text:p text:style-name="P3">By faith[<text:span text:style-name="T8">G4102</text:span>] Abraham, when he was tried, offered up Isaac: and he that had received the promises offered up his only begotten <text:span text:style-name="T2">son</text:span>, </text:p>
          </table:table-cell>
        </table:table-row>
        <table:table-row table:style-name="Table2.1">
          <table:table-cell table:style-name="Table2.A2" office:value-type="string">
            <text:p text:style-name="Table_20_Contents"><text:a xlink:type="simple" xlink:href="bible://AVs/Heb%2011:20" text:style-name="Internet_20_link" text:visited-style-name="Visited_20_Internet_20_Link"><text:bookmark text:name="Heb Copy 52"/><text:span text:style-name="T6">Heb 11:20</text:span></text:a><text:span text:style-name="T7"> </text:span></text:p>
          </table:table-cell>
          <table:table-cell table:style-name="Table2.B2" office:value-type="string">
            <text:p text:style-name="P3">By faith[<text:span text:style-name="T8">G4102</text:span>] Isaac blessed Jacob and Esau concerning things to come. </text:p>
          </table:table-cell>
        </table:table-row>
        <table:table-row table:style-name="Table2.190">
          <table:table-cell table:style-name="Table2.A2" office:value-type="string">
            <text:p text:style-name="Table_20_Contents"><text:a xlink:type="simple" xlink:href="bible://AVs/Heb%2011:21" text:style-name="Internet_20_link" text:visited-style-name="Visited_20_Internet_20_Link"><text:bookmark text:name="Heb Copy 53"/><text:span text:style-name="T6">Heb 11:21</text:span></text:a><text:span text:style-name="T7"> </text:span></text:p>
          </table:table-cell>
          <table:table-cell table:style-name="Table2.B2" office:value-type="string">
            <text:p text:style-name="P3">By faith[<text:span text:style-name="T8">G4102</text:span>] Jacob, when he was a dying, blessed both the sons of Joseph; and worshipped, <text:span text:style-name="T2">leaning</text:span> upon the top of his staff. </text:p>
          </table:table-cell>
        </table:table-row>
        <table:table-row table:style-name="Table2.1">
          <table:table-cell table:style-name="Table2.A2" office:value-type="string">
            <text:p text:style-name="Table_20_Contents"><text:a xlink:type="simple" xlink:href="bible://AVs/Heb%2011:22" text:style-name="Internet_20_link" text:visited-style-name="Visited_20_Internet_20_Link"><text:bookmark text:name="Heb Copy 54"/><text:span text:style-name="T6">Heb 11:22</text:span></text:a><text:span text:style-name="T7"> </text:span></text:p>
          </table:table-cell>
          <table:table-cell table:style-name="Table2.B2" office:value-type="string">
            <text:p text:style-name="P3">By faith[<text:span text:style-name="T8">G4102</text:span>] Joseph, when he died, made<text:a xlink:type="simple" xlink:href="../../../Apps/Bible%20Analyzer%205.6%20Portable/bibleFN/AVs/Heb%2011:22://6" text:style-name="Internet_20_link" text:visited-style-name="Visited_20_Internet_20_Link"><text:span text:style-name="T9">6</text:span></text:a> mention of the departing of the children of Israel; and gave commandment concerning his bones. </text:p>
          </table:table-cell>
        </table:table-row>
        <table:table-row table:style-name="Table2.192">
          <table:table-cell table:style-name="Table2.A2" office:value-type="string">
            <text:p text:style-name="Table_20_Contents"><text:a xlink:type="simple" xlink:href="bible://AVs/Heb%2011:23" text:style-name="Internet_20_link" text:visited-style-name="Visited_20_Internet_20_Link"><text:bookmark text:name="Heb Copy 55"/><text:span text:style-name="T6">Heb 11:23</text:span></text:a><text:span text:style-name="T7"> </text:span></text:p>
          </table:table-cell>
          <table:table-cell table:style-name="Table2.B2" office:value-type="string">
            <text:p text:style-name="P3">By faith[<text:span text:style-name="T8">G4102</text:span>] Moses, when he was born, was hid three months of his parents, because they saw <text:span text:style-name="T2">he was</text:span> a proper child; and they were not afraid of the king's commandment. </text:p>
          </table:table-cell>
        </table:table-row>
        <table:table-row table:style-name="Table2.1">
          <table:table-cell table:style-name="Table2.A2" office:value-type="string">
            <text:p text:style-name="Table_20_Contents"><text:a xlink:type="simple" xlink:href="bible://AVs/Heb%2011:24" text:style-name="Internet_20_link" text:visited-style-name="Visited_20_Internet_20_Link"><text:bookmark text:name="Heb Copy 56"/><text:span text:style-name="T6">Heb 11:24</text:span></text:a><text:span text:style-name="T7"> </text:span></text:p>
          </table:table-cell>
          <table:table-cell table:style-name="Table2.B2" office:value-type="string">
            <text:p text:style-name="P3">By faith[<text:span text:style-name="T8">G4102</text:span>] Moses, when he was come to years, refused to be called the son of Pharaoh's daughter; </text:p>
          </table:table-cell>
        </table:table-row>
        <table:table-row table:style-name="Table2.194">
          <table:table-cell table:style-name="Table2.A2" office:value-type="string">
            <text:p text:style-name="Table_20_Contents"><text:a xlink:type="simple" xlink:href="bible://AVs/Heb%2011:27" text:style-name="Internet_20_link" text:visited-style-name="Visited_20_Internet_20_Link"><text:bookmark text:name="Heb Copy 57"/><text:span text:style-name="T6">Heb 11:27</text:span></text:a><text:span text:style-name="T7"> </text:span></text:p>
          </table:table-cell>
          <table:table-cell table:style-name="Table2.B2" office:value-type="string">
            <text:p text:style-name="P3">By faith[<text:span text:style-name="T8">G4102</text:span>] he forsook Egypt, not fearing the wrath of the king: for he endured, as seeing him who is invisible. </text:p>
          </table:table-cell>
        </table:table-row>
        <table:table-row table:style-name="Table2.1">
          <table:table-cell table:style-name="Table2.A2" office:value-type="string">
            <text:p text:style-name="Table_20_Contents"><text:a xlink:type="simple" xlink:href="bible://AVs/Heb%2011:28" text:style-name="Internet_20_link" text:visited-style-name="Visited_20_Internet_20_Link"><text:bookmark text:name="Heb Copy 58"/><text:span text:style-name="T6">Heb 11:28</text:span></text:a><text:span text:style-name="T7"> </text:span></text:p>
          </table:table-cell>
          <table:table-cell table:style-name="Table2.B2" office:value-type="string">
            <text:p text:style-name="P3">Through faith[<text:span text:style-name="T8">G4102</text:span>] he kept the passover, and the sprinkling of blood, lest he that destroyed the firstborn should touch them. </text:p>
          </table:table-cell>
        </table:table-row>
        <table:table-row table:style-name="Table2.196">
          <table:table-cell table:style-name="Table2.A2" office:value-type="string">
            <text:p text:style-name="Table_20_Contents"><text:a xlink:type="simple" xlink:href="bible://AVs/Heb%2011:29" text:style-name="Internet_20_link" text:visited-style-name="Visited_20_Internet_20_Link"><text:bookmark text:name="Heb Copy 59"/><text:span text:style-name="T6">Heb 11:29</text:span></text:a><text:span text:style-name="T7"> </text:span></text:p>
          </table:table-cell>
          <table:table-cell table:style-name="Table2.B2" office:value-type="string">
            <text:p text:style-name="P3">By faith[<text:span text:style-name="T8">G4102</text:span>] they passed through the Red sea as by dry <text:span text:style-name="T2">land</text:span>: which the Egyptians assaying to do were drowned. </text:p>
          </table:table-cell>
        </table:table-row>
        <table:table-row table:style-name="Table2.1">
          <table:table-cell table:style-name="Table2.A2" office:value-type="string">
            <text:p text:style-name="Table_20_Contents"><text:a xlink:type="simple" xlink:href="bible://AVs/Heb%2011:30" text:style-name="Internet_20_link" text:visited-style-name="Visited_20_Internet_20_Link"><text:bookmark text:name="Heb Copy 60"/><text:span text:style-name="T6">Heb 11:30</text:span></text:a><text:span text:style-name="T7"> </text:span></text:p>
          </table:table-cell>
          <table:table-cell table:style-name="Table2.B2" office:value-type="string">
            <text:p text:style-name="P3">By faith[<text:span text:style-name="T8">G4102</text:span>] the walls of Jericho fell down, after they were compassed about seven days. </text:p>
          </table:table-cell>
        </table:table-row>
        <table:table-row table:style-name="Table2.198">
          <table:table-cell table:style-name="Table2.A2" office:value-type="string">
            <text:p text:style-name="Table_20_Contents"><text:a xlink:type="simple" xlink:href="bible://AVs/Heb%2011:31" text:style-name="Internet_20_link" text:visited-style-name="Visited_20_Internet_20_Link"><text:bookmark text:name="Heb Copy 61"/><text:span text:style-name="T6">Heb 11:31</text:span></text:a><text:span text:style-name="T7"> </text:span></text:p>
          </table:table-cell>
          <table:table-cell table:style-name="Table2.B2" office:value-type="string">
            <text:p text:style-name="P3">By faith[<text:span text:style-name="T8">G4102</text:span>] the harlot Rahab perished not with them that<text:a xlink:type="simple" xlink:href="../../../Apps/Bible%20Analyzer%205.6%20Portable/bibleFN/AVs/Heb%2011:31://8" text:style-name="Internet_20_link" text:visited-style-name="Visited_20_Internet_20_Link"><text:span text:style-name="T9">8</text:span></text:a> believed not, when she had received the spies with peace. </text:p>
          </table:table-cell>
        </table:table-row>
        <table:table-row table:style-name="Table2.1">
          <table:table-cell table:style-name="Table2.A2" office:value-type="string">
            <text:p text:style-name="Table_20_Contents"><text:a xlink:type="simple" xlink:href="bible://AVs/Heb%2011:33" text:style-name="Internet_20_link" text:visited-style-name="Visited_20_Internet_20_Link"><text:bookmark text:name="Heb Copy 62"/><text:span text:style-name="T6">Heb 11:33</text:span></text:a><text:span text:style-name="T7"> </text:span></text:p>
          </table:table-cell>
          <table:table-cell table:style-name="Table2.B2" office:value-type="string">
            <text:p text:style-name="P3">Who through faith[<text:span text:style-name="T8">G4102</text:span>] subdued kingdoms, wrought righteousness, obtained promises, stopped the mouths of lions, </text:p>
          </table:table-cell>
        </table:table-row>
        <table:table-row table:style-name="Table2.200">
          <table:table-cell table:style-name="Table2.A2" office:value-type="string">
            <text:p text:style-name="Table_20_Contents"><text:a xlink:type="simple" xlink:href="bible://AVs/Heb%2011:39" text:style-name="Internet_20_link" text:visited-style-name="Visited_20_Internet_20_Link"><text:bookmark text:name="Heb Copy 63"/><text:span text:style-name="T6">Heb 11:39</text:span></text:a><text:span text:style-name="T7"> </text:span></text:p>
          </table:table-cell>
          <table:table-cell table:style-name="Table2.B2" office:value-type="string">
            <text:p text:style-name="P3">And these all, having obtained a good report through faith[<text:span text:style-name="T8">G4102</text:span>], received not the promise: </text:p>
          </table:table-cell>
        </table:table-row>
        <text:soft-page-break/>
        <table:table-row table:style-name="Table2.1">
          <table:table-cell table:style-name="Table2.A2" office:value-type="string">
            <text:p text:style-name="Table_20_Contents"><text:a xlink:type="simple" xlink:href="bible://AVs/Heb%2012:2" text:style-name="Internet_20_link" text:visited-style-name="Visited_20_Internet_20_Link"><text:bookmark text:name="Heb Copy 64"/><text:span text:style-name="T6">Heb 12:2</text:span></text:a><text:span text:style-name="T7"> </text:span></text:p>
          </table:table-cell>
          <table:table-cell table:style-name="Table2.B2" office:value-type="string">
            <text:p text:style-name="P3">Looking unto Jesus the author<text:a xlink:type="simple" xlink:href="../../../Apps/Bible%20Analyzer%205.6%20Portable/bibleFN/AVs/Heb%2012:2://1" text:style-name="Internet_20_link" text:visited-style-name="Visited_20_Internet_20_Link"><text:span text:style-name="T9">1</text:span></text:a> and finisher of <text:span text:style-name="T2">our</text:span> faith[<text:span text:style-name="T8">G4102</text:span>]; who for the joy that was set before him endured the cross, despising the shame, and is set down at the right hand of the throne of God. </text:p>
          </table:table-cell>
        </table:table-row>
        <table:table-row table:style-name="Table2.202">
          <table:table-cell table:style-name="Table2.A2" office:value-type="string">
            <text:p text:style-name="Table_20_Contents"><text:a xlink:type="simple" xlink:href="bible://AVs/Heb%2013:7" text:style-name="Internet_20_link" text:visited-style-name="Visited_20_Internet_20_Link"><text:bookmark text:name="Heb Copy 65"/><text:span text:style-name="T6">Heb 13:7</text:span></text:a><text:span text:style-name="T7"> </text:span></text:p>
          </table:table-cell>
          <table:table-cell table:style-name="Table2.B2" office:value-type="string">
            <text:p text:style-name="P3">Remember them which have<text:a xlink:type="simple" xlink:href="../../../Apps/Bible%20Analyzer%205.6%20Portable/bibleFN/AVs/Heb%2013:7://1" text:style-name="Internet_20_link" text:visited-style-name="Visited_20_Internet_20_Link"><text:span text:style-name="T9">1</text:span></text:a> the rule over you, who have spoken unto you the word of God: whose faith[<text:span text:style-name="T8">G4102</text:span>] follow, considering the end of <text:span text:style-name="T2">their</text:span> conversation. </text:p>
          </table:table-cell>
        </table:table-row>
        <table:table-row table:style-name="Table2.1">
          <table:table-cell table:style-name="Table2.A2" office:value-type="string">
            <text:p text:style-name="Table_20_Contents"><text:a xlink:type="simple" xlink:href="bible://AVs/Jam%201:3" text:style-name="Internet_20_link" text:visited-style-name="Visited_20_Internet_20_Link"><text:bookmark text:name="Jam"/><text:span text:style-name="T6">Jam 1:3</text:span></text:a><text:span text:style-name="T7"> </text:span></text:p>
          </table:table-cell>
          <table:table-cell table:style-name="Table2.B2" office:value-type="string">
            <text:p text:style-name="P3">Knowing <text:span text:style-name="T2">this</text:span>, that the trying of your faith[<text:span text:style-name="T8">G4102</text:span>] worketh patience. </text:p>
          </table:table-cell>
        </table:table-row>
        <table:table-row table:style-name="Table2.204">
          <table:table-cell table:style-name="Table2.A2" office:value-type="string">
            <text:p text:style-name="Table_20_Contents"><text:a xlink:type="simple" xlink:href="bible://AVs/Jam%201:6" text:style-name="Internet_20_link" text:visited-style-name="Visited_20_Internet_20_Link"><text:bookmark text:name="Jam Copy 12"/><text:span text:style-name="T6">Jam 1:6</text:span></text:a><text:span text:style-name="T7"> </text:span></text:p>
          </table:table-cell>
          <table:table-cell table:style-name="Table2.B2" office:value-type="string">
            <text:p text:style-name="P3">But let him ask in faith[<text:span text:style-name="T8">G4102</text:span>], nothing wavering. For he that wavereth is like a wave of the sea driven with the wind and tossed. </text:p>
          </table:table-cell>
        </table:table-row>
        <table:table-row table:style-name="Table2.1">
          <table:table-cell table:style-name="Table2.A2" office:value-type="string">
            <text:p text:style-name="Table_20_Contents"><text:a xlink:type="simple" xlink:href="bible://AVs/Jam%202:1" text:style-name="Internet_20_link" text:visited-style-name="Visited_20_Internet_20_Link"><text:bookmark text:name="Jam Copy 13"/><text:span text:style-name="T6">Jam 2:1</text:span></text:a><text:span text:style-name="T7"> </text:span></text:p>
          </table:table-cell>
          <table:table-cell table:style-name="Table2.B2" office:value-type="string">
            <text:p text:style-name="P3">¶ My brethren, have not the faith[<text:span text:style-name="T8">G4102</text:span>] of our Lord Jesus Christ, <text:span text:style-name="T2">the Lord</text:span> of glory, with respect of persons. </text:p>
          </table:table-cell>
        </table:table-row>
        <table:table-row table:style-name="Table2.206">
          <table:table-cell table:style-name="Table2.A2" office:value-type="string">
            <text:p text:style-name="Table_20_Contents"><text:a xlink:type="simple" xlink:href="bible://AVs/Jam%202:5" text:style-name="Internet_20_link" text:visited-style-name="Visited_20_Internet_20_Link"><text:bookmark text:name="Jam Copy 14"/><text:span text:style-name="T6">Jam 2:5</text:span></text:a><text:span text:style-name="T7"> </text:span></text:p>
          </table:table-cell>
          <table:table-cell table:style-name="Table2.B2" office:value-type="string">
            <text:p text:style-name="P3">Hearken, my beloved brethren, Hath not God chosen the poor of this world rich in faith[<text:span text:style-name="T8">G4102</text:span>], and heirs of the<text:a xlink:type="simple" xlink:href="../../../Apps/Bible%20Analyzer%205.6%20Portable/bibleFN/AVs/Jam%202:5://3" text:style-name="Internet_20_link" text:visited-style-name="Visited_20_Internet_20_Link"><text:span text:style-name="T9">3</text:span></text:a> kingdom which he hath promised to them that love him? </text:p>
          </table:table-cell>
        </table:table-row>
        <table:table-row table:style-name="Table2.1">
          <table:table-cell table:style-name="Table2.A2" office:value-type="string">
            <text:p text:style-name="Table_20_Contents"><text:a xlink:type="simple" xlink:href="bible://AVs/Jam%202:14" text:style-name="Internet_20_link" text:visited-style-name="Visited_20_Internet_20_Link"><text:bookmark text:name="Jam Copy 15"/><text:span text:style-name="T6">Jam 2:14</text:span></text:a><text:span text:style-name="T7"> </text:span></text:p>
          </table:table-cell>
          <table:table-cell table:style-name="Table2.B2" office:value-type="string">
            <text:p text:style-name="P3">What <text:span text:style-name="T2">doth it</text:span> profit, my brethren, though a man say he hath faith[<text:span text:style-name="T8">G4102</text:span>], and have not works? can faith[<text:span text:style-name="T8">G4102</text:span>] save him? </text:p>
          </table:table-cell>
        </table:table-row>
        <table:table-row table:style-name="Table2.208">
          <table:table-cell table:style-name="Table2.A2" office:value-type="string">
            <text:p text:style-name="Table_20_Contents"><text:a xlink:type="simple" xlink:href="bible://AVs/Jam%202:17" text:style-name="Internet_20_link" text:visited-style-name="Visited_20_Internet_20_Link"><text:bookmark text:name="Jam Copy 16"/><text:span text:style-name="T6">Jam 2:17</text:span></text:a><text:span text:style-name="T7"> </text:span></text:p>
          </table:table-cell>
          <table:table-cell table:style-name="Table2.B2" office:value-type="string">
            <text:p text:style-name="P3">Even so faith[<text:span text:style-name="T8">G4102</text:span>], if it hath not works, is dead, being alone.<text:a xlink:type="simple" xlink:href="../../../Apps/Bible%20Analyzer%205.6%20Portable/bibleFN/AVs/Jam%202:17://6" text:style-name="Internet_20_link" text:visited-style-name="Visited_20_Internet_20_Link"><text:span text:style-name="T9">6</text:span></text:a> </text:p>
          </table:table-cell>
        </table:table-row>
        <table:table-row table:style-name="Table2.1">
          <table:table-cell table:style-name="Table2.A2" office:value-type="string">
            <text:p text:style-name="Table_20_Contents"><text:a xlink:type="simple" xlink:href="bible://AVs/Jam%202:18" text:style-name="Internet_20_link" text:visited-style-name="Visited_20_Internet_20_Link"><text:bookmark text:name="Jam Copy 17"/><text:span text:style-name="T6">Jam 2:18</text:span></text:a><text:span text:style-name="T7"> </text:span></text:p>
          </table:table-cell>
          <table:table-cell table:style-name="Table2.B2" office:value-type="string">
            <text:p text:style-name="P3">Yea, a man may say, Thou hast faith[<text:span text:style-name="T8">G4102</text:span>], and I have works: shew me thy faith[<text:span text:style-name="T8">G4102</text:span>] without<text:a xlink:type="simple" xlink:href="../../../Apps/Bible%20Analyzer%205.6%20Portable/bibleFN/AVs/Jam%202:18://7" text:style-name="Internet_20_link" text:visited-style-name="Visited_20_Internet_20_Link"><text:span text:style-name="T9">7</text:span></text:a> thy works, and I will shew thee my faith[<text:span text:style-name="T8">G4102</text:span>] by my works. </text:p>
          </table:table-cell>
        </table:table-row>
        <table:table-row table:style-name="Table2.210">
          <table:table-cell table:style-name="Table2.A2" office:value-type="string">
            <text:p text:style-name="Table_20_Contents"><text:a xlink:type="simple" xlink:href="bible://AVs/Jam%202:20" text:style-name="Internet_20_link" text:visited-style-name="Visited_20_Internet_20_Link"><text:bookmark text:name="Jam Copy 18"/><text:span text:style-name="T6">Jam 2:20</text:span></text:a><text:span text:style-name="T7"> </text:span></text:p>
          </table:table-cell>
          <table:table-cell table:style-name="Table2.B2" office:value-type="string">
            <text:p text:style-name="P3">But wilt thou know, O vain man, that faith[<text:span text:style-name="T8">G4102</text:span>] without works is dead? </text:p>
          </table:table-cell>
        </table:table-row>
        <table:table-row table:style-name="Table2.1">
          <table:table-cell table:style-name="Table2.A2" office:value-type="string">
            <text:p text:style-name="Table_20_Contents"><text:a xlink:type="simple" xlink:href="bible://AVs/Jam%202:22" text:style-name="Internet_20_link" text:visited-style-name="Visited_20_Internet_20_Link"><text:bookmark text:name="Jam Copy 19"/><text:span text:style-name="T6">Jam 2:22</text:span></text:a><text:span text:style-name="T7"> </text:span></text:p>
          </table:table-cell>
          <table:table-cell table:style-name="Table2.B2" office:value-type="string">
            <text:p text:style-name="P3">Seest<text:a xlink:type="simple" xlink:href="../../../Apps/Bible%20Analyzer%205.6%20Portable/bibleFN/AVs/Jam%202:22://8" text:style-name="Internet_20_link" text:visited-style-name="Visited_20_Internet_20_Link"><text:span text:style-name="T9">8</text:span></text:a> thou how faith[<text:span text:style-name="T8">G4102</text:span>] wrought with his works, and by works was faith[<text:span text:style-name="T8">G4102</text:span>] made perfect? </text:p>
          </table:table-cell>
        </table:table-row>
        <table:table-row table:style-name="Table2.212">
          <table:table-cell table:style-name="Table2.A2" office:value-type="string">
            <text:p text:style-name="Table_20_Contents"><text:a xlink:type="simple" xlink:href="bible://AVs/Jam%202:24" text:style-name="Internet_20_link" text:visited-style-name="Visited_20_Internet_20_Link"><text:bookmark text:name="Jam Copy 20"/><text:span text:style-name="T6">Jam 2:24</text:span></text:a><text:span text:style-name="T7"> </text:span></text:p>
          </table:table-cell>
          <table:table-cell table:style-name="Table2.B2" office:value-type="string">
            <text:p text:style-name="P3">Ye see then how that by works a man is justified, and not by faith[<text:span text:style-name="T8">G4102</text:span>] only. </text:p>
          </table:table-cell>
        </table:table-row>
        <table:table-row table:style-name="Table2.1">
          <table:table-cell table:style-name="Table2.A2" office:value-type="string">
            <text:p text:style-name="Table_20_Contents"><text:a xlink:type="simple" xlink:href="bible://AVs/Jam%202:26" text:style-name="Internet_20_link" text:visited-style-name="Visited_20_Internet_20_Link"><text:bookmark text:name="Jam Copy 21"/><text:span text:style-name="T6">Jam 2:26</text:span></text:a><text:span text:style-name="T7"> </text:span></text:p>
          </table:table-cell>
          <table:table-cell table:style-name="Table2.B2" office:value-type="string">
            <text:p text:style-name="P3">For as the body without the spirit<text:a xlink:type="simple" xlink:href="../../../Apps/Bible%20Analyzer%205.6%20Portable/bibleFN/AVs/Jam%202:26://9" text:style-name="Internet_20_link" text:visited-style-name="Visited_20_Internet_20_Link"><text:span text:style-name="T9">9</text:span></text:a> is dead, so faith[<text:span text:style-name="T8">G4102</text:span>] without works is dead also. </text:p>
          </table:table-cell>
        </table:table-row>
        <table:table-row table:style-name="Table2.214">
          <table:table-cell table:style-name="Table2.A2" office:value-type="string">
            <text:p text:style-name="Table_20_Contents"><text:a xlink:type="simple" xlink:href="bible://AVs/Jam%205:15" text:style-name="Internet_20_link" text:visited-style-name="Visited_20_Internet_20_Link"><text:bookmark text:name="Jam Copy 22"/><text:span text:style-name="T6">Jam 5:15</text:span></text:a><text:span text:style-name="T7"> </text:span></text:p>
          </table:table-cell>
          <table:table-cell table:style-name="Table2.B2" office:value-type="string">
            <text:p text:style-name="P3">And the prayer of faith[<text:span text:style-name="T8">G4102</text:span>] shall save the sick, and the Lord shall raise him up; and if he have committed sins, they shall be forgiven him. </text:p>
          </table:table-cell>
        </table:table-row>
        <table:table-row table:style-name="Table2.1">
          <table:table-cell table:style-name="Table2.A2" office:value-type="string">
            <text:p text:style-name="Table_20_Contents"><text:a xlink:type="simple" xlink:href="bible://AVs/1Pe%201:5" text:style-name="Internet_20_link" text:visited-style-name="Visited_20_Internet_20_Link"><text:bookmark text:name="1Pe"/><text:span text:style-name="T6">1Pe 1:5</text:span></text:a><text:span text:style-name="T7"> </text:span></text:p>
          </table:table-cell>
          <table:table-cell table:style-name="Table2.B2" office:value-type="string">
            <text:p text:style-name="P3">Who are kept by the power of God through faith[<text:span text:style-name="T8">G4102</text:span>] unto salvation ready to be revealed in the last time. </text:p>
          </table:table-cell>
        </table:table-row>
        <table:table-row table:style-name="Table2.216">
          <table:table-cell table:style-name="Table2.A2" office:value-type="string">
            <text:p text:style-name="Table_20_Contents"><text:a xlink:type="simple" xlink:href="bible://AVs/1Pe%201:7" text:style-name="Internet_20_link" text:visited-style-name="Visited_20_Internet_20_Link"><text:bookmark text:name="1Pe Copy 7"/><text:span text:style-name="T6">1Pe 1:7</text:span></text:a><text:span text:style-name="T7"> </text:span></text:p>
          </table:table-cell>
          <table:table-cell table:style-name="Table2.B2" office:value-type="string">
            <text:p text:style-name="P3">That the trial of your faith[<text:span text:style-name="T8">G4102</text:span>], being much more precious than of gold that perisheth, though it be tried with fire, might be found unto praise and honour and glory at the appearing of Jesus Christ: </text:p>
          </table:table-cell>
        </table:table-row>
        <table:table-row table:style-name="Table2.1">
          <table:table-cell table:style-name="Table2.A2" office:value-type="string">
            <text:p text:style-name="Table_20_Contents"><text:a xlink:type="simple" xlink:href="bible://AVs/1Pe%201:9" text:style-name="Internet_20_link" text:visited-style-name="Visited_20_Internet_20_Link"><text:bookmark text:name="1Pe Copy 8"/><text:span text:style-name="T6">1Pe 1:9</text:span></text:a><text:span text:style-name="T7"> </text:span></text:p>
          </table:table-cell>
          <table:table-cell table:style-name="Table2.B2" office:value-type="string">
            <text:p text:style-name="P3">Receiving the end of your faith[<text:span text:style-name="T8">G4102</text:span>], <text:span text:style-name="T2">even</text:span> the salvation of <text:span text:style-name="T2">your</text:span> souls. </text:p>
          </table:table-cell>
        </table:table-row>
        <table:table-row table:style-name="Table2.218">
          <table:table-cell table:style-name="Table2.A2" office:value-type="string">
            <text:p text:style-name="Table_20_Contents"><text:a xlink:type="simple" xlink:href="bible://AVs/1Pe%201:21" text:style-name="Internet_20_link" text:visited-style-name="Visited_20_Internet_20_Link"><text:bookmark text:name="1Pe Copy 9"/><text:span text:style-name="T6">1Pe 1:21</text:span></text:a><text:span text:style-name="T7"> </text:span></text:p>
          </table:table-cell>
          <table:table-cell table:style-name="Table2.B2" office:value-type="string">
            <text:p text:style-name="P3">Who by him do believe in God, that raised him up from the dead, and gave him glory; that your faith[<text:span text:style-name="T8">G4102</text:span>] and hope might be in God. </text:p>
          </table:table-cell>
        </table:table-row>
        <table:table-row table:style-name="Table2.1">
          <table:table-cell table:style-name="Table2.A2" office:value-type="string">
            <text:p text:style-name="Table_20_Contents"><text:a xlink:type="simple" xlink:href="bible://AVs/1Pe%205:9" text:style-name="Internet_20_link" text:visited-style-name="Visited_20_Internet_20_Link"><text:bookmark text:name="1Pe Copy 10"/><text:span text:style-name="T6">1Pe 5:9</text:span></text:a><text:span text:style-name="T7"> </text:span></text:p>
          </table:table-cell>
          <table:table-cell table:style-name="Table2.B2" office:value-type="string">
            <text:p text:style-name="P3">Whom resist stedfast in the faith[<text:span text:style-name="T8">G4102</text:span>], knowing that the same afflictions are accomplished in your brethren that are in the world. </text:p>
          </table:table-cell>
        </table:table-row>
        <table:table-row table:style-name="Table2.220">
          <table:table-cell table:style-name="Table2.A2" office:value-type="string">
            <text:p text:style-name="Table_20_Contents"><text:a xlink:type="simple" xlink:href="bible://AVs/2Pe%201:1" text:style-name="Internet_20_link" text:visited-style-name="Visited_20_Internet_20_Link"><text:bookmark text:name="2Pe"/><text:span text:style-name="T6">2Pe 1:1</text:span></text:a><text:span text:style-name="T7"> </text:span></text:p>
          </table:table-cell>
          <table:table-cell table:style-name="Table2.B2" office:value-type="string">
            <text:p text:style-name="P3">¶ Simon<text:a xlink:type="simple" xlink:href="../../../Apps/Bible%20Analyzer%205.6%20Portable/bibleFN/AVs/2Pe%201:1://1" text:style-name="Internet_20_link" text:visited-style-name="Visited_20_Internet_20_Link"><text:span text:style-name="T9">1</text:span></text:a> Peter, a servant and an apostle of Jesus Christ, to them that have obtained like precious faith[<text:span text:style-name="T8">G4102</text:span>] with us through the righteousness of<text:a xlink:type="simple" xlink:href="../../../Apps/Bible%20Analyzer%205.6%20Portable/bibleFN/AVs/2Pe%201:1://2" text:style-name="Internet_20_link" text:visited-style-name="Visited_20_Internet_20_Link"><text:span text:style-name="T9">2</text:span></text:a> God and our Saviour Jesus Christ: </text:p>
          </table:table-cell>
        </table:table-row>
        <table:table-row table:style-name="Table2.1">
          <table:table-cell table:style-name="Table2.A2" office:value-type="string">
            <text:p text:style-name="Table_20_Contents"><text:a xlink:type="simple" xlink:href="bible://AVs/2Pe%201:5" text:style-name="Internet_20_link" text:visited-style-name="Visited_20_Internet_20_Link"><text:bookmark text:name="2Pe Copy 2"/><text:span text:style-name="T6">2Pe 1:5</text:span></text:a><text:span text:style-name="T7"> </text:span></text:p>
          </table:table-cell>
          <table:table-cell table:style-name="Table2.B2" office:value-type="string">
            <text:p text:style-name="P3">And beside this, giving all diligence, add to your faith[<text:span text:style-name="T8">G4102</text:span>] virtue; and to virtue knowledge; </text:p>
          </table:table-cell>
        </table:table-row>
        <table:table-row table:style-name="Table2.222">
          <table:table-cell table:style-name="Table2.A2" office:value-type="string">
            <text:p text:style-name="Table_20_Contents"><text:a xlink:type="simple" xlink:href="bible://AVs/1Jo%205:4" text:style-name="Internet_20_link" text:visited-style-name="Visited_20_Internet_20_Link"><text:bookmark text:name="1Jo"/><text:span text:style-name="T6">1Jo 5:4</text:span></text:a><text:span text:style-name="T7"> </text:span></text:p>
          </table:table-cell>
          <table:table-cell table:style-name="Table2.B2" office:value-type="string">
            <text:p text:style-name="P3">For whatsoever is born of God overcometh the world: and this is the victory that overcometh the world, <text:span text:style-name="T2">even</text:span> our faith[<text:span text:style-name="T8">G4102</text:span>]. </text:p>
          </table:table-cell>
        </table:table-row>
        <text:soft-page-break/>
        <table:table-row table:style-name="Table2.1">
          <table:table-cell table:style-name="Table2.A2" office:value-type="string">
            <text:p text:style-name="Table_20_Contents"><text:a xlink:type="simple" xlink:href="bible://AVs/Jud%201:3" text:style-name="Internet_20_link" text:visited-style-name="Visited_20_Internet_20_Link"><text:bookmark text:name="Jud"/><text:span text:style-name="T6">Jud 1:3</text:span></text:a><text:span text:style-name="T7"> </text:span></text:p>
          </table:table-cell>
          <table:table-cell table:style-name="Table2.B2" office:value-type="string">
            <text:p text:style-name="P3">Beloved, when I gave all diligence to write unto you of the common salvation, it was needful for me to write unto you, and exhort <text:span text:style-name="T2">you</text:span> that ye should earnestly contend for the faith[<text:span text:style-name="T8">G4102</text:span>] which was once delivered unto the saints. </text:p>
          </table:table-cell>
        </table:table-row>
        <table:table-row table:style-name="Table2.224">
          <table:table-cell table:style-name="Table2.A2" office:value-type="string">
            <text:p text:style-name="Table_20_Contents"><text:a xlink:type="simple" xlink:href="bible://AVs/Jud%201:20" text:style-name="Internet_20_link" text:visited-style-name="Visited_20_Internet_20_Link"><text:bookmark text:name="Jud Copy 2"/><text:span text:style-name="T6">Jud 1:20</text:span></text:a><text:span text:style-name="T7"> </text:span></text:p>
          </table:table-cell>
          <table:table-cell table:style-name="Table2.B2" office:value-type="string">
            <text:p text:style-name="P3">But ye, beloved, building up yourselves on your most holy faith[<text:span text:style-name="T8">G4102</text:span>], praying in the Holy Ghost, </text:p>
          </table:table-cell>
        </table:table-row>
        <table:table-row table:style-name="Table2.1">
          <table:table-cell table:style-name="Table2.A2" office:value-type="string">
            <text:p text:style-name="Table_20_Contents"><text:a xlink:type="simple" xlink:href="bible://AVs/Rev%202:13" text:style-name="Internet_20_link" text:visited-style-name="Visited_20_Internet_20_Link"><text:bookmark text:name="Rev"/><text:span text:style-name="T6">Rev 2:13</text:span></text:a><text:span text:style-name="T7"> </text:span></text:p>
          </table:table-cell>
          <table:table-cell table:style-name="Table2.B2" office:value-type="string">
            <text:p text:style-name="P3"><text:span text:style-name="T1">I know thy works, and where thou dwellest,</text:span> <text:span text:style-name="T2">even</text:span> <text:span text:style-name="T1">where Satan's seat</text:span> <text:span text:style-name="T2">is</text:span>: <text:span text:style-name="T1">and thou holdest fast my name, and hast not denied my faith[</text:span><text:span text:style-name="T3">G4102</text:span><text:span text:style-name="T1">], even in those days wherein Antipas</text:span> <text:span text:style-name="T2">was</text:span> <text:span text:style-name="T1">my faithful martyr, who was slain among you, where Satan dwelleth.</text:span> </text:p>
          </table:table-cell>
        </table:table-row>
        <table:table-row table:style-name="Table2.226">
          <table:table-cell table:style-name="Table2.A2" office:value-type="string">
            <text:p text:style-name="Table_20_Contents"><text:a xlink:type="simple" xlink:href="bible://AVs/Rev%202:19" text:style-name="Internet_20_link" text:visited-style-name="Visited_20_Internet_20_Link"><text:bookmark text:name="Rev Copy 4"/><text:span text:style-name="T6">Rev 2:19</text:span></text:a><text:span text:style-name="T7"> </text:span></text:p>
          </table:table-cell>
          <table:table-cell table:style-name="Table2.B2" office:value-type="string">
            <text:p text:style-name="P3"><text:span text:style-name="T1">I know thy works, and charity, and service, and faith[</text:span><text:span text:style-name="T3">G4102</text:span><text:span text:style-name="T1">], and thy patience, and thy works; and the last</text:span> <text:span text:style-name="T2">to be</text:span> <text:span text:style-name="T1">more than the first.</text:span> </text:p>
          </table:table-cell>
        </table:table-row>
        <table:table-row table:style-name="Table2.1">
          <table:table-cell table:style-name="Table2.A2" office:value-type="string">
            <text:p text:style-name="Table_20_Contents"><text:a xlink:type="simple" xlink:href="bible://AVs/Rev%2013:10" text:style-name="Internet_20_link" text:visited-style-name="Visited_20_Internet_20_Link"><text:bookmark text:name="Rev Copy 5"/><text:span text:style-name="T6">Rev 13:10</text:span></text:a><text:span text:style-name="T7"> </text:span></text:p>
          </table:table-cell>
          <table:table-cell table:style-name="Table2.B2" office:value-type="string">
            <text:p text:style-name="P3">He that leadeth into captivity shall go into captivity: he that killeth with the sword must be killed with the sword. Here is the patience and the faith[<text:span text:style-name="T8">G4102</text:span>] of the saints. </text:p>
          </table:table-cell>
        </table:table-row>
        <table:table-row table:style-name="Table2.228">
          <table:table-cell table:style-name="Table2.A2" office:value-type="string">
            <text:p text:style-name="Table_20_Contents"><text:a xlink:type="simple" xlink:href="bible://AVs/Rev%2014:12" text:style-name="Internet_20_link" text:visited-style-name="Visited_20_Internet_20_Link"><text:bookmark text:name="Rev Copy 6"/><text:span text:style-name="T6">Rev 14:12</text:span></text:a><text:span text:style-name="T7"> </text:span></text:p>
          </table:table-cell>
          <table:table-cell table:style-name="Table2.B2" office:value-type="string">
            <text:p text:style-name="P3">Here is the patience of the saints: here <text:span text:style-name="T2">are</text:span> they that keep the commandments of God, and the faith[<text:span text:style-name="T8">G4102</text:span>] of Jesus. </text:p>
          </table:table-cell>
        </table:table-row>
      </table:table>
      <text:p text:style-name="P2"/>
      <text:p text:style-name="P2"/>
      <text:p text:style-name="P5">G1680: expectation (abstractly or concretely) or confidence</text:p>
      <text:p text:style-name="P6">outline: <text:span text:style-name="T10">hope, hope’s sake</text:span></text:p>
      <text:p text:style-name="P6"/>
      <text:p text:style-name="P6"/>
      <table:table table:name="Table3" table:style-name="Table3">
        <table:table-column table:style-name="Table3.A"/>
        <table:table-column table:style-name="Table3.B"/>
        <table:table-row table:style-name="Table3.1">
          <table:table-cell table:style-name="Table3.A1" office:value-type="string">
            <text:p text:style-name="Table_20_Contents"><text:a xlink:type="simple" xlink:href="bible://AVs/Act%202:26" text:style-name="Internet_20_link" text:visited-style-name="Visited_20_Internet_20_Link"><text:span text:style-name="T6">Act 2:26</text:span></text:a><text:span text:style-name="T7"> </text:span></text:p>
          </table:table-cell>
          <table:table-cell table:style-name="Table3.B1" office:value-type="string">
            <text:p text:style-name="P3">Therefore did my heart rejoice, and my tongue was glad; moreover also my flesh shall rest in hope[<text:span text:style-name="T8">G1680</text:span>]: </text:p>
          </table:table-cell>
        </table:table-row>
        <table:table-row table:style-name="Table3.2">
          <table:table-cell table:style-name="Table3.A2" office:value-type="string">
            <text:p text:style-name="Table_20_Contents"><text:a xlink:type="simple" xlink:href="bible://AVs/Act%2016:19" text:style-name="Internet_20_link" text:visited-style-name="Visited_20_Internet_20_Link"><text:bookmark text:name="Act Copy 37"/><text:span text:style-name="T6">Act 16:19</text:span></text:a><text:span text:style-name="T7"> </text:span></text:p>
          </table:table-cell>
          <table:table-cell table:style-name="Table3.B2" office:value-type="string">
            <text:p text:style-name="P3">¶ And when her masters saw that the hope[<text:span text:style-name="T8">G1680</text:span>] of their gains was gone, they caught Paul and Silas, and drew <text:span text:style-name="T2">them</text:span> into the marketplace<text:a xlink:type="simple" xlink:href="../../../Apps/Bible%20Analyzer%205.6%20Portable/bibleFN/AVs/Act%2016:19://4" text:style-name="Internet_20_link" text:visited-style-name="Visited_20_Internet_20_Link"><text:span text:style-name="T9">4</text:span></text:a> unto the rulers, </text:p>
          </table:table-cell>
        </table:table-row>
        <table:table-row table:style-name="Table3.1">
          <table:table-cell table:style-name="Table3.A2" office:value-type="string">
            <text:p text:style-name="Table_20_Contents"><text:a xlink:type="simple" xlink:href="bible://AVs/Act%2023:6" text:style-name="Internet_20_link" text:visited-style-name="Visited_20_Internet_20_Link"><text:bookmark text:name="Act Copy 38"/><text:span text:style-name="T6">Act 23:6</text:span></text:a><text:span text:style-name="T7"> </text:span></text:p>
          </table:table-cell>
          <table:table-cell table:style-name="Table3.B2" office:value-type="string">
            <text:p text:style-name="P3">But when Paul perceived that the one part were Sadducees, and the other Pharisees, he cried out in the council, Men <text:span text:style-name="T2">and</text:span> brethren, I am a Pharisee, the son of a Pharisee: of the hope[<text:span text:style-name="T8">G1680</text:span>] and resurrection of the dead I am called in question. </text:p>
          </table:table-cell>
        </table:table-row>
        <table:table-row table:style-name="Table3.4">
          <table:table-cell table:style-name="Table3.A2" office:value-type="string">
            <text:p text:style-name="Table_20_Contents"><text:a xlink:type="simple" xlink:href="bible://AVs/Act%2024:15" text:style-name="Internet_20_link" text:visited-style-name="Visited_20_Internet_20_Link"><text:bookmark text:name="Act Copy 39"/><text:span text:style-name="T6">Act 24:15</text:span></text:a><text:span text:style-name="T7"> </text:span></text:p>
          </table:table-cell>
          <table:table-cell table:style-name="Table3.B2" office:value-type="string">
            <text:p text:style-name="P3">And have hope[<text:span text:style-name="T8">G1680</text:span>] toward God, which they themselves also allow, that there shall be a resurrection of the dead, both of the just and unjust. </text:p>
          </table:table-cell>
        </table:table-row>
        <table:table-row table:style-name="Table3.1">
          <table:table-cell table:style-name="Table3.A2" office:value-type="string">
            <text:p text:style-name="Table_20_Contents"><text:a xlink:type="simple" xlink:href="bible://AVs/Act%2026:6" text:style-name="Internet_20_link" text:visited-style-name="Visited_20_Internet_20_Link"><text:bookmark text:name="Act Copy 40"/><text:span text:style-name="T6">Act 26:6</text:span></text:a><text:span text:style-name="T7"> </text:span></text:p>
          </table:table-cell>
          <table:table-cell table:style-name="Table3.B2" office:value-type="string">
            <text:p text:style-name="P3">And now I stand and am judged for the hope[<text:span text:style-name="T8">G1680</text:span>] of the promise made of God unto our fathers: </text:p>
          </table:table-cell>
        </table:table-row>
        <table:table-row table:style-name="Table3.6">
          <table:table-cell table:style-name="Table3.A2" office:value-type="string">
            <text:p text:style-name="Table_20_Contents"><text:a xlink:type="simple" xlink:href="bible://AVs/Act%2026:7" text:style-name="Internet_20_link" text:visited-style-name="Visited_20_Internet_20_Link"><text:bookmark text:name="Act Copy 41"/><text:span text:style-name="T6">Act 26:7</text:span></text:a><text:span text:style-name="T7"> </text:span></text:p>
          </table:table-cell>
          <table:table-cell table:style-name="Table3.B2" office:value-type="string">
            <text:p text:style-name="P3">Unto which <text:span text:style-name="T2">promise</text:span> our twelve tribes, instantly serving <text:span text:style-name="T2">God</text:span> day<text:a xlink:type="simple" xlink:href="../../../Apps/Bible%20Analyzer%205.6%20Portable/bibleFN/AVs/Act%2026:7://1" text:style-name="Internet_20_link" text:visited-style-name="Visited_20_Internet_20_Link"><text:span text:style-name="T9">1</text:span></text:a> and night, hope to come. For which hope's sake[<text:span text:style-name="T8">G1680</text:span>], king Agrippa, I am accused of the Jews. </text:p>
          </table:table-cell>
        </table:table-row>
        <table:table-row table:style-name="Table3.1">
          <table:table-cell table:style-name="Table3.A2" office:value-type="string">
            <text:p text:style-name="Table_20_Contents"><text:a xlink:type="simple" xlink:href="bible://AVs/Act%2027:20" text:style-name="Internet_20_link" text:visited-style-name="Visited_20_Internet_20_Link"><text:bookmark text:name="Act Copy 42"/><text:span text:style-name="T6">Act 27:20</text:span></text:a><text:span text:style-name="T7"> </text:span></text:p>
          </table:table-cell>
          <table:table-cell table:style-name="Table3.B2" office:value-type="string">
            <text:p text:style-name="P3">And when neither sun nor stars in many days appeared, and no small tempest lay on <text:span text:style-name="T2">us</text:span>, all hope[<text:span text:style-name="T8">G1680</text:span>] that we should be saved was then taken away. </text:p>
          </table:table-cell>
        </table:table-row>
        <table:table-row table:style-name="Table3.8">
          <table:table-cell table:style-name="Table3.A2" office:value-type="string">
            <text:p text:style-name="Table_20_Contents"><text:a xlink:type="simple" xlink:href="bible://AVs/Act%2028:20" text:style-name="Internet_20_link" text:visited-style-name="Visited_20_Internet_20_Link"><text:bookmark text:name="Act Copy 43"/><text:span text:style-name="T6">Act 28:20</text:span></text:a><text:span text:style-name="T7"> </text:span></text:p>
          </table:table-cell>
          <table:table-cell table:style-name="Table3.B2" office:value-type="string">
            <text:p text:style-name="P3">For this cause therefore have I called for you, to see <text:span text:style-name="T2">you</text:span>, and to speak with <text:span text:style-name="T2">you</text:span>: because that for the hope[<text:span text:style-name="T8">G1680</text:span>] of Israel I am bound with this chain. </text:p>
          </table:table-cell>
        </table:table-row>
        <table:table-row table:style-name="Table3.1">
          <table:table-cell table:style-name="Table3.A2" office:value-type="string">
            <text:p text:style-name="Table_20_Contents"><text:a xlink:type="simple" xlink:href="bible://AVs/Rom%204:18" text:style-name="Internet_20_link" text:visited-style-name="Visited_20_Internet_20_Link"><text:bookmark text:name="Rom Copy 77"/><text:span text:style-name="T6">Rom 4:18</text:span></text:a><text:span text:style-name="T7"> </text:span></text:p>
          </table:table-cell>
          <table:table-cell table:style-name="Table3.B2" office:value-type="string">
            <text:p text:style-name="P3">Who against hope[<text:span text:style-name="T8">G1680</text:span>] believed in hope[<text:span text:style-name="T8">G1680</text:span>], that he might become the father of many nations, according to that which was spoken, So shall thy seed be. </text:p>
          </table:table-cell>
        </table:table-row>
        <table:table-row table:style-name="Table3.10">
          <table:table-cell table:style-name="Table3.A2" office:value-type="string">
            <text:p text:style-name="Table_20_Contents"><text:a xlink:type="simple" xlink:href="bible://AVs/Rom%205:2" text:style-name="Internet_20_link" text:visited-style-name="Visited_20_Internet_20_Link"><text:bookmark text:name="Rom Copy 78"/><text:span text:style-name="T6">Rom 5:2</text:span></text:a><text:span text:style-name="T7"> </text:span></text:p>
          </table:table-cell>
          <table:table-cell table:style-name="Table3.B2" office:value-type="string">
            <text:p text:style-name="P3">By whom also we have access by faith into this grace wherein we stand, and rejoice in hope[<text:span text:style-name="T8">G1680</text:span>] of the glory of God. </text:p>
          </table:table-cell>
        </table:table-row>
        <table:table-row table:style-name="Table3.1">
          <table:table-cell table:style-name="Table3.A2" office:value-type="string">
            <text:p text:style-name="Table_20_Contents"><text:a xlink:type="simple" xlink:href="bible://AVs/Rom%205:4" text:style-name="Internet_20_link" text:visited-style-name="Visited_20_Internet_20_Link"><text:bookmark text:name="Rom Copy 79"/><text:span text:style-name="T6">Rom 5:4</text:span></text:a><text:span text:style-name="T7"> </text:span></text:p>
          </table:table-cell>
          <table:table-cell table:style-name="Table3.B2" office:value-type="string">
            <text:p text:style-name="P3">And patience, experience; and experience, hope[<text:span text:style-name="T8">G1680</text:span>]: </text:p>
          </table:table-cell>
        </table:table-row>
        <table:table-row table:style-name="Table3.12">
          <table:table-cell table:style-name="Table3.A2" office:value-type="string">
            <text:p text:style-name="Table_20_Contents"><text:a xlink:type="simple" xlink:href="bible://AVs/Rom%205:5" text:style-name="Internet_20_link" text:visited-style-name="Visited_20_Internet_20_Link"><text:bookmark text:name="Rom Copy 80"/><text:span text:style-name="T6">Rom 5:5</text:span></text:a><text:span text:style-name="T7"> </text:span></text:p>
          </table:table-cell>
          <table:table-cell table:style-name="Table3.B2" office:value-type="string">
            <text:p text:style-name="P3">And hope[<text:span text:style-name="T8">G1680</text:span>] maketh not ashamed; because the love of God is shed abroad in our hearts by the Holy Ghost which is given unto us. </text:p>
          </table:table-cell>
        </table:table-row>
        <text:soft-page-break/>
        <table:table-row table:style-name="Table3.1">
          <table:table-cell table:style-name="Table3.A2" office:value-type="string">
            <text:p text:style-name="Table_20_Contents"><text:a xlink:type="simple" xlink:href="bible://AVs/Rom%208:20" text:style-name="Internet_20_link" text:visited-style-name="Visited_20_Internet_20_Link"><text:bookmark text:name="Rom Copy 81"/><text:span text:style-name="T6">Rom 8:20</text:span></text:a><text:span text:style-name="T7"> </text:span></text:p>
          </table:table-cell>
          <table:table-cell table:style-name="Table3.B2" office:value-type="string">
            <text:p text:style-name="P3">For the creature was made subject to vanity, not willingly, but by reason of him who hath subjected <text:span text:style-name="T2">the same</text:span> in hope[<text:span text:style-name="T8">G1680</text:span>], </text:p>
          </table:table-cell>
        </table:table-row>
        <table:table-row table:style-name="Table3.14">
          <table:table-cell table:style-name="Table3.A2" office:value-type="string">
            <text:p text:style-name="Table_20_Contents"><text:a xlink:type="simple" xlink:href="bible://AVs/Rom%208:24" text:style-name="Internet_20_link" text:visited-style-name="Visited_20_Internet_20_Link"><text:bookmark text:name="Rom Copy 82"/><text:span text:style-name="T6">Rom 8:24</text:span></text:a><text:span text:style-name="T7"> </text:span></text:p>
          </table:table-cell>
          <table:table-cell table:style-name="Table3.B2" office:value-type="string">
            <text:p text:style-name="P3">For we are saved by hope[<text:span text:style-name="T8">G1680</text:span>]: but hope[<text:span text:style-name="T8">G1680</text:span>] that is seen is not hope[<text:span text:style-name="T8">G1680</text:span>]: for what a man seeth, why doth he yet hope for? </text:p>
          </table:table-cell>
        </table:table-row>
        <table:table-row table:style-name="Table3.1">
          <table:table-cell table:style-name="Table3.A2" office:value-type="string">
            <text:p text:style-name="Table_20_Contents"><text:a xlink:type="simple" xlink:href="bible://AVs/Rom%2012:12" text:style-name="Internet_20_link" text:visited-style-name="Visited_20_Internet_20_Link"><text:bookmark text:name="Rom Copy 83"/><text:span text:style-name="T6">Rom 12:12</text:span></text:a><text:span text:style-name="T7"> </text:span></text:p>
          </table:table-cell>
          <table:table-cell table:style-name="Table3.B2" office:value-type="string">
            <text:p text:style-name="P3">Rejoicing in hope[<text:span text:style-name="T8">G1680</text:span>]; patient in tribulation; continuing instant in prayer; </text:p>
          </table:table-cell>
        </table:table-row>
        <table:table-row table:style-name="Table3.16">
          <table:table-cell table:style-name="Table3.A2" office:value-type="string">
            <text:p text:style-name="Table_20_Contents"><text:a xlink:type="simple" xlink:href="bible://AVs/Rom%2015:4" text:style-name="Internet_20_link" text:visited-style-name="Visited_20_Internet_20_Link"><text:bookmark text:name="Rom Copy 84"/><text:span text:style-name="T6">Rom 15:4</text:span></text:a><text:span text:style-name="T7"> </text:span></text:p>
          </table:table-cell>
          <table:table-cell table:style-name="Table3.B2" office:value-type="string">
            <text:p text:style-name="P3">For whatsoever things were written aforetime were written for our learning, that we through patience and comfort of the scriptures might have hope[<text:span text:style-name="T8">G1680</text:span>]. </text:p>
          </table:table-cell>
        </table:table-row>
        <table:table-row table:style-name="Table3.1">
          <table:table-cell table:style-name="Table3.A2" office:value-type="string">
            <text:p text:style-name="Table_20_Contents"><text:a xlink:type="simple" xlink:href="bible://AVs/Rom%2015:13" text:style-name="Internet_20_link" text:visited-style-name="Visited_20_Internet_20_Link"><text:bookmark text:name="Rom Copy 85"/><text:span text:style-name="T6">Rom 15:13</text:span></text:a><text:span text:style-name="T7"> </text:span></text:p>
          </table:table-cell>
          <table:table-cell table:style-name="Table3.B2" office:value-type="string">
            <text:p text:style-name="P3">Now the God of hope[<text:span text:style-name="T8">G1680</text:span>] fill you with all joy and peace in believing, that ye may abound in hope[<text:span text:style-name="T8">G1680</text:span>], through the power of the Holy Ghost. </text:p>
          </table:table-cell>
        </table:table-row>
        <table:table-row table:style-name="Table3.18">
          <table:table-cell table:style-name="Table3.A2" office:value-type="string">
            <text:p text:style-name="Table_20_Contents"><text:a xlink:type="simple" xlink:href="bible://AVs/1Co%209:10" text:style-name="Internet_20_link" text:visited-style-name="Visited_20_Internet_20_Link"><text:bookmark text:name="1Co Copy 14"/><text:span text:style-name="T6">1Co 9:10</text:span></text:a><text:span text:style-name="T7"> </text:span></text:p>
          </table:table-cell>
          <table:table-cell table:style-name="Table3.B2" office:value-type="string">
            <text:p text:style-name="P3">Or saith he <text:span text:style-name="T2">it</text:span> altogether for our sakes? For our sakes, no doubt, <text:span text:style-name="T2">this</text:span> is written: that he that ploweth should plow in hope[<text:span text:style-name="T8">G1680</text:span>]; and that he that thresheth in hope[<text:span text:style-name="T8">G1680</text:span>] should be partaker of his hope[<text:span text:style-name="T8">G1680</text:span>]. </text:p>
          </table:table-cell>
        </table:table-row>
        <table:table-row table:style-name="Table3.1">
          <table:table-cell table:style-name="Table3.A2" office:value-type="string">
            <text:p text:style-name="Table_20_Contents"><text:a xlink:type="simple" xlink:href="bible://AVs/1Co%2013:13" text:style-name="Internet_20_link" text:visited-style-name="Visited_20_Internet_20_Link"><text:bookmark text:name="1Co Copy 15"/><text:span text:style-name="T6">1Co 13:13</text:span></text:a><text:span text:style-name="T7"> </text:span></text:p>
          </table:table-cell>
          <table:table-cell table:style-name="Table3.B2" office:value-type="string">
            <text:p text:style-name="P3">And now abideth faith, hope[<text:span text:style-name="T8">G1680</text:span>], charity, these three; but the greatest of these <text:span text:style-name="T2">is</text:span> charity. </text:p>
          </table:table-cell>
        </table:table-row>
        <table:table-row table:style-name="Table3.20">
          <table:table-cell table:style-name="Table3.A2" office:value-type="string">
            <text:p text:style-name="Table_20_Contents"><text:a xlink:type="simple" xlink:href="bible://AVs/2Co%201:7" text:style-name="Internet_20_link" text:visited-style-name="Visited_20_Internet_20_Link"><text:bookmark text:name="2Co Copy 13"/><text:span text:style-name="T6">2Co 1:7</text:span></text:a><text:span text:style-name="T7"> </text:span></text:p>
          </table:table-cell>
          <table:table-cell table:style-name="Table3.B2" office:value-type="string">
            <text:p text:style-name="P3">And our hope[<text:span text:style-name="T8">G1680</text:span>] of you <text:span text:style-name="T2">is</text:span> stedfast, knowing, that as ye are partakers of the sufferings, so <text:span text:style-name="T2">shall ye be</text:span> also of the consolation. </text:p>
          </table:table-cell>
        </table:table-row>
        <table:table-row table:style-name="Table3.1">
          <table:table-cell table:style-name="Table3.A2" office:value-type="string">
            <text:p text:style-name="Table_20_Contents"><text:a xlink:type="simple" xlink:href="bible://AVs/2Co%203:12" text:style-name="Internet_20_link" text:visited-style-name="Visited_20_Internet_20_Link"><text:bookmark text:name="2Co Copy 14"/><text:span text:style-name="T6">2Co 3:12</text:span></text:a><text:span text:style-name="T7"> </text:span></text:p>
          </table:table-cell>
          <table:table-cell table:style-name="Table3.B2" office:value-type="string">
            <text:p text:style-name="P3">Seeing then that we have such hope[<text:span text:style-name="T8">G1680</text:span>], we use great plainness<text:a xlink:type="simple" xlink:href="../../../Apps/Bible%20Analyzer%205.6%20Portable/bibleFN/AVs/2Co%203:12://2" text:style-name="Internet_20_link" text:visited-style-name="Visited_20_Internet_20_Link"><text:span text:style-name="T9">2</text:span></text:a> of speech: </text:p>
          </table:table-cell>
        </table:table-row>
        <table:table-row table:style-name="Table3.22">
          <table:table-cell table:style-name="Table3.A2" office:value-type="string">
            <text:p text:style-name="Table_20_Contents"><text:a xlink:type="simple" xlink:href="bible://AVs/2Co%2010:15" text:style-name="Internet_20_link" text:visited-style-name="Visited_20_Internet_20_Link"><text:bookmark text:name="2Co Copy 15"/><text:span text:style-name="T6">2Co 10:15</text:span></text:a><text:span text:style-name="T7"> </text:span></text:p>
          </table:table-cell>
          <table:table-cell table:style-name="Table3.B2" office:value-type="string">
            <text:p text:style-name="P3">Not boasting of things without <text:span text:style-name="T2">our</text:span> measure, <text:span text:style-name="T2">that is</text:span>, of other men's labours; but having hope[<text:span text:style-name="T8">G1680</text:span>], when your faith is increased, that we shall be enlarged<text:a xlink:type="simple" xlink:href="../../../Apps/Bible%20Analyzer%205.6%20Portable/bibleFN/AVs/2Co%2010:15://9" text:style-name="Internet_20_link" text:visited-style-name="Visited_20_Internet_20_Link"><text:span text:style-name="T9">9</text:span></text:a> by you according to our rule abundantly, </text:p>
          </table:table-cell>
        </table:table-row>
        <table:table-row table:style-name="Table3.1">
          <table:table-cell table:style-name="Table3.A2" office:value-type="string">
            <text:p text:style-name="Table_20_Contents"><text:a xlink:type="simple" xlink:href="bible://AVs/Gal%205:5" text:style-name="Internet_20_link" text:visited-style-name="Visited_20_Internet_20_Link"><text:bookmark text:name="Gal Copy 39"/><text:span text:style-name="T6">Gal 5:5</text:span></text:a><text:span text:style-name="T7"> </text:span></text:p>
          </table:table-cell>
          <table:table-cell table:style-name="Table3.B2" office:value-type="string">
            <text:p text:style-name="P3">For we through the Spirit wait for the hope[<text:span text:style-name="T8">G1680</text:span>] of righteousness by faith. </text:p>
          </table:table-cell>
        </table:table-row>
        <table:table-row table:style-name="Table3.24">
          <table:table-cell table:style-name="Table3.A2" office:value-type="string">
            <text:p text:style-name="Table_20_Contents"><text:a xlink:type="simple" xlink:href="bible://AVs/Eph%201:18" text:style-name="Internet_20_link" text:visited-style-name="Visited_20_Internet_20_Link"><text:bookmark text:name="Eph Copy 18"/><text:span text:style-name="T6">Eph 1:18</text:span></text:a><text:span text:style-name="T7"> </text:span></text:p>
          </table:table-cell>
          <table:table-cell table:style-name="Table3.B2" office:value-type="string">
            <text:p text:style-name="P3">The eyes of your understanding being enlightened; that ye may know what is the hope[<text:span text:style-name="T8">G1680</text:span>] of his calling, and what the riches of the glory of his inheritance in the saints, </text:p>
          </table:table-cell>
        </table:table-row>
        <table:table-row table:style-name="Table3.1">
          <table:table-cell table:style-name="Table3.A2" office:value-type="string">
            <text:p text:style-name="Table_20_Contents"><text:a xlink:type="simple" xlink:href="bible://AVs/Eph%202:12" text:style-name="Internet_20_link" text:visited-style-name="Visited_20_Internet_20_Link"><text:bookmark text:name="Eph Copy 19"/><text:span text:style-name="T6">Eph 2:12</text:span></text:a><text:span text:style-name="T7"> </text:span></text:p>
          </table:table-cell>
          <table:table-cell table:style-name="Table3.B2" office:value-type="string">
            <text:p text:style-name="P3">That at that time ye were without Christ, being aliens from the commonwealth of Israel, and strangers from the covenants of promise, having no hope[<text:span text:style-name="T8">G1680</text:span>], and without God in the world: </text:p>
          </table:table-cell>
        </table:table-row>
        <table:table-row table:style-name="Table3.26">
          <table:table-cell table:style-name="Table3.A2" office:value-type="string">
            <text:p text:style-name="Table_20_Contents"><text:a xlink:type="simple" xlink:href="bible://AVs/Eph%204:4" text:style-name="Internet_20_link" text:visited-style-name="Visited_20_Internet_20_Link"><text:bookmark text:name="Eph Copy 20"/><text:span text:style-name="T6">Eph 4:4</text:span></text:a><text:span text:style-name="T7"> </text:span></text:p>
          </table:table-cell>
          <table:table-cell table:style-name="Table3.B2" office:value-type="string">
            <text:p text:style-name="P3"><text:span text:style-name="T2">There is</text:span> one body, and one Spirit, even as ye are called in one hope[<text:span text:style-name="T8">G1680</text:span>] of your calling; </text:p>
          </table:table-cell>
        </table:table-row>
        <table:table-row table:style-name="Table3.1">
          <table:table-cell table:style-name="Table3.A2" office:value-type="string">
            <text:p text:style-name="Table_20_Contents"><text:a xlink:type="simple" xlink:href="bible://AVs/Phi%201:20" text:style-name="Internet_20_link" text:visited-style-name="Visited_20_Internet_20_Link"><text:bookmark text:name="Phi Copy 8"/><text:span text:style-name="T6">Phi 1:20</text:span></text:a><text:span text:style-name="T7"> </text:span></text:p>
          </table:table-cell>
          <table:table-cell table:style-name="Table3.B2" office:value-type="string">
            <text:p text:style-name="P3">According to my earnest expectation and <text:span text:style-name="T2">my</text:span> hope[<text:span text:style-name="T8">G1680</text:span>], that in nothing I shall be ashamed, but <text:span text:style-name="T2">that</text:span> with all boldness, as always, <text:span text:style-name="T2">so</text:span> now also Christ shall be magnified in my body, whether <text:span text:style-name="T2">it be</text:span> by life, or by death. </text:p>
          </table:table-cell>
        </table:table-row>
        <table:table-row table:style-name="Table3.28">
          <table:table-cell table:style-name="Table3.A2" office:value-type="string">
            <text:p text:style-name="Table_20_Contents"><text:a xlink:type="simple" xlink:href="bible://AVs/Col%201:5" text:style-name="Internet_20_link" text:visited-style-name="Visited_20_Internet_20_Link"><text:bookmark text:name="Col Copy 11"/><text:span text:style-name="T6">Col 1:5</text:span></text:a><text:span text:style-name="T7"> </text:span></text:p>
          </table:table-cell>
          <table:table-cell table:style-name="Table3.B2" office:value-type="string">
            <text:p text:style-name="P3">For the hope[<text:span text:style-name="T8">G1680</text:span>] which is laid up for you in heaven, whereof ye heard before in the word of the truth of the gospel; </text:p>
          </table:table-cell>
        </table:table-row>
        <table:table-row table:style-name="Table3.1">
          <table:table-cell table:style-name="Table3.A2" office:value-type="string">
            <text:p text:style-name="Table_20_Contents"><text:a xlink:type="simple" xlink:href="bible://AVs/Col%201:23" text:style-name="Internet_20_link" text:visited-style-name="Visited_20_Internet_20_Link"><text:bookmark text:name="Col Copy 12"/><text:span text:style-name="T6">Col 1:23</text:span></text:a><text:span text:style-name="T7"> </text:span></text:p>
          </table:table-cell>
          <table:table-cell table:style-name="Table3.B2" office:value-type="string">
            <text:p text:style-name="P3">If ye continue in the faith grounded and settled, and <text:span text:style-name="T2">be</text:span> not moved away from the hope[<text:span text:style-name="T8">G1680</text:span>] of the gospel, which ye have heard, <text:span text:style-name="T2">and</text:span> which was preached to every creature which is under heaven; whereof I Paul am made a minister; </text:p>
          </table:table-cell>
        </table:table-row>
        <table:table-row table:style-name="Table3.30">
          <table:table-cell table:style-name="Table3.A2" office:value-type="string">
            <text:p text:style-name="Table_20_Contents"><text:a xlink:type="simple" xlink:href="bible://AVs/Col%201:27" text:style-name="Internet_20_link" text:visited-style-name="Visited_20_Internet_20_Link"><text:bookmark text:name="Col Copy 13"/><text:span text:style-name="T6">Col 1:27</text:span></text:a><text:span text:style-name="T7"> </text:span></text:p>
          </table:table-cell>
          <table:table-cell table:style-name="Table3.B2" office:value-type="string">
            <text:p text:style-name="P3">To whom God would make known what <text:span text:style-name="T2">is</text:span> the riches of the glory of this mystery among the Gentiles; which is Christ in<text:a xlink:type="simple" xlink:href="../../../Apps/Bible%20Analyzer%205.6%20Portable/bibleFN/AVs/Col%201:27://6" text:style-name="Internet_20_link" text:visited-style-name="Visited_20_Internet_20_Link"><text:span text:style-name="T9">6</text:span></text:a> you, the hope[<text:span text:style-name="T8">G1680</text:span>] of glory: </text:p>
          </table:table-cell>
        </table:table-row>
        <table:table-row table:style-name="Table3.1">
          <table:table-cell table:style-name="Table3.A2" office:value-type="string">
            <text:p text:style-name="Table_20_Contents"><text:a xlink:type="simple" xlink:href="bible://AVs/1Th%201:3" text:style-name="Internet_20_link" text:visited-style-name="Visited_20_Internet_20_Link"><text:bookmark text:name="1Th Copy 17"/><text:span text:style-name="T6">1Th 1:3</text:span></text:a><text:span text:style-name="T7"> </text:span></text:p>
          </table:table-cell>
          <table:table-cell table:style-name="Table3.B2" office:value-type="string">
            <text:p text:style-name="P3">Remembering without ceasing your work of faith, and labour of love, and patience of hope[<text:span text:style-name="T8">G1680</text:span>] in our Lord Jesus Christ, in the sight of God and our Father; </text:p>
          </table:table-cell>
        </table:table-row>
        <table:table-row table:style-name="Table3.32">
          <table:table-cell table:style-name="Table3.A2" office:value-type="string">
            <text:p text:style-name="Table_20_Contents"><text:a xlink:type="simple" xlink:href="bible://AVs/1Th%202:19" text:style-name="Internet_20_link" text:visited-style-name="Visited_20_Internet_20_Link"><text:bookmark text:name="1Th Copy 18"/><text:span text:style-name="T6">1Th 2:19</text:span></text:a><text:span text:style-name="T7"> </text:span></text:p>
          </table:table-cell>
          <table:table-cell table:style-name="Table3.B2" office:value-type="string">
            <text:p text:style-name="P3">For what <text:span text:style-name="T2">is</text:span> our hope[<text:span text:style-name="T8">G1680</text:span>], or joy, or crown of rejoicing?<text:a xlink:type="simple" xlink:href="../../../Apps/Bible%20Analyzer%205.6%20Portable/bibleFN/AVs/1Th%202:19://3" text:style-name="Internet_20_link" text:visited-style-name="Visited_20_Internet_20_Link"><text:span text:style-name="T9">3</text:span></text:a> <text:span text:style-name="T2">Are</text:span> not even ye in the presence of our Lord Jesus Christ at his coming? </text:p>
          </table:table-cell>
        </table:table-row>
        <table:table-row table:style-name="Table3.1">
          <table:table-cell table:style-name="Table3.A2" office:value-type="string">
            <text:p text:style-name="Table_20_Contents"><text:a xlink:type="simple" xlink:href="bible://AVs/1Th%204:13" text:style-name="Internet_20_link" text:visited-style-name="Visited_20_Internet_20_Link"><text:bookmark text:name="1Th Copy 19"/><text:span text:style-name="T6">1Th 4:13</text:span></text:a><text:span text:style-name="T7"> </text:span></text:p>
          </table:table-cell>
          <table:table-cell table:style-name="Table3.B2" office:value-type="string">
            <text:p text:style-name="P3">But I would not have you to be ignorant, brethren, concerning them which are asleep, that ye sorrow not, even as others which have no hope[<text:span text:style-name="T8">G1680</text:span>]. </text:p>
          </table:table-cell>
        </table:table-row>
        <text:soft-page-break/>
        <table:table-row table:style-name="Table3.34">
          <table:table-cell table:style-name="Table3.A2" office:value-type="string">
            <text:p text:style-name="Table_20_Contents"><text:a xlink:type="simple" xlink:href="bible://AVs/1Th%205:8" text:style-name="Internet_20_link" text:visited-style-name="Visited_20_Internet_20_Link"><text:bookmark text:name="1Th Copy 20"/><text:span text:style-name="T6">1Th 5:8</text:span></text:a><text:span text:style-name="T7"> </text:span></text:p>
          </table:table-cell>
          <table:table-cell table:style-name="Table3.B2" office:value-type="string">
            <text:p text:style-name="P3">But let us, who are of the day, be sober, putting on the breastplate of faith and love; and for an helmet, the hope[<text:span text:style-name="T8">G1680</text:span>] of salvation. </text:p>
          </table:table-cell>
        </table:table-row>
        <table:table-row table:style-name="Table3.1">
          <table:table-cell table:style-name="Table3.A2" office:value-type="string">
            <text:p text:style-name="Table_20_Contents"><text:a xlink:type="simple" xlink:href="bible://AVs/2Th%202:16" text:style-name="Internet_20_link" text:visited-style-name="Visited_20_Internet_20_Link"><text:bookmark text:name="2Th Copy 10"/><text:span text:style-name="T6">2Th 2:16</text:span></text:a><text:span text:style-name="T7"> </text:span></text:p>
          </table:table-cell>
          <table:table-cell table:style-name="Table3.B2" office:value-type="string">
            <text:p text:style-name="P3">Now our Lord Jesus Christ himself, and God, even our Father, which hath loved us, and hath given <text:span text:style-name="T2">us</text:span> everlasting consolation and good hope[<text:span text:style-name="T8">G1680</text:span>] through grace, </text:p>
          </table:table-cell>
        </table:table-row>
        <table:table-row table:style-name="Table3.36">
          <table:table-cell table:style-name="Table3.A2" office:value-type="string">
            <text:p text:style-name="Table_20_Contents"><text:a xlink:type="simple" xlink:href="bible://AVs/1Ti%201:1" text:style-name="Internet_20_link" text:visited-style-name="Visited_20_Internet_20_Link"><text:bookmark text:name="1Ti Copy 36"/><text:span text:style-name="T6">1Ti 1:1</text:span></text:a><text:span text:style-name="T7"> </text:span></text:p>
          </table:table-cell>
          <table:table-cell table:style-name="Table3.B2" office:value-type="string">
            <text:p text:style-name="P3">¶ Paul, an apostle of Jesus Christ by the commandment of God our Saviour, and Lord Jesus Christ, <text:span text:style-name="T2">which</text:span> <text:span text:style-name="T2">is</text:span> our hope[<text:span text:style-name="T8">G1680</text:span>]; </text:p>
          </table:table-cell>
        </table:table-row>
        <table:table-row table:style-name="Table3.1">
          <table:table-cell table:style-name="Table3.A2" office:value-type="string">
            <text:p text:style-name="Table_20_Contents"><text:a xlink:type="simple" xlink:href="bible://AVs/Tit%201:2" text:style-name="Internet_20_link" text:visited-style-name="Visited_20_Internet_20_Link"><text:bookmark text:name="Tit Copy 14"/><text:span text:style-name="T6">Tit 1:2</text:span></text:a><text:span text:style-name="T7"> </text:span></text:p>
          </table:table-cell>
          <table:table-cell table:style-name="Table3.B2" office:value-type="string">
            <text:p text:style-name="P3">In<text:a xlink:type="simple" xlink:href="../../../Apps/Bible%20Analyzer%205.6%20Portable/bibleFN/AVs/Tit%201:2://1" text:style-name="Internet_20_link" text:visited-style-name="Visited_20_Internet_20_Link"><text:span text:style-name="T9">1</text:span></text:a> hope[<text:span text:style-name="T8">G1680</text:span>] of eternal life, which God, that cannot lie, promised before the world began; </text:p>
          </table:table-cell>
        </table:table-row>
        <table:table-row table:style-name="Table3.38">
          <table:table-cell table:style-name="Table3.A2" office:value-type="string">
            <text:p text:style-name="Table_20_Contents"><text:a xlink:type="simple" xlink:href="bible://AVs/Tit%202:13" text:style-name="Internet_20_link" text:visited-style-name="Visited_20_Internet_20_Link"><text:bookmark text:name="Tit Copy 15"/><text:span text:style-name="T6">Tit 2:13</text:span></text:a><text:span text:style-name="T7"> </text:span></text:p>
          </table:table-cell>
          <table:table-cell table:style-name="Table3.B2" office:value-type="string">
            <text:p text:style-name="P3">Looking for that blessed hope[<text:span text:style-name="T8">G1680</text:span>], and the glorious appearing of the great God and our Saviour Jesus Christ; </text:p>
          </table:table-cell>
        </table:table-row>
        <table:table-row table:style-name="Table3.1">
          <table:table-cell table:style-name="Table3.A2" office:value-type="string">
            <text:p text:style-name="Table_20_Contents"><text:a xlink:type="simple" xlink:href="bible://AVs/Tit%203:7" text:style-name="Internet_20_link" text:visited-style-name="Visited_20_Internet_20_Link"><text:bookmark text:name="Tit Copy 16"/><text:span text:style-name="T6">Tit 3:7</text:span></text:a><text:span text:style-name="T7"> </text:span></text:p>
          </table:table-cell>
          <table:table-cell table:style-name="Table3.B2" office:value-type="string">
            <text:p text:style-name="P3">That being justified by his grace, we should be made heirs according to the hope[<text:span text:style-name="T8">G1680</text:span>] of eternal life. </text:p>
          </table:table-cell>
        </table:table-row>
        <table:table-row table:style-name="Table3.40">
          <table:table-cell table:style-name="Table3.A2" office:value-type="string">
            <text:p text:style-name="Table_20_Contents"><text:a xlink:type="simple" xlink:href="bible://AVs/Heb%203:6" text:style-name="Internet_20_link" text:visited-style-name="Visited_20_Internet_20_Link"><text:bookmark text:name="Heb Copy 66"/><text:span text:style-name="T6">Heb 3:6</text:span></text:a><text:span text:style-name="T7"> </text:span></text:p>
          </table:table-cell>
          <table:table-cell table:style-name="Table3.B2" office:value-type="string">
            <text:p text:style-name="P3">But Christ as a son over his own house; whose house are we, if we hold fast the confidence and the rejoicing of the hope[<text:span text:style-name="T8">G1680</text:span>] firm unto the end. </text:p>
          </table:table-cell>
        </table:table-row>
        <table:table-row table:style-name="Table3.1">
          <table:table-cell table:style-name="Table3.A2" office:value-type="string">
            <text:p text:style-name="Table_20_Contents"><text:a xlink:type="simple" xlink:href="bible://AVs/Heb%206:11" text:style-name="Internet_20_link" text:visited-style-name="Visited_20_Internet_20_Link"><text:bookmark text:name="Heb Copy 67"/><text:span text:style-name="T6">Heb 6:11</text:span></text:a><text:span text:style-name="T7"> </text:span></text:p>
          </table:table-cell>
          <table:table-cell table:style-name="Table3.B2" office:value-type="string">
            <text:p text:style-name="P3">And we desire that every one of you do shew the same diligence to the full assurance of hope[<text:span text:style-name="T8">G1680</text:span>] unto the end: </text:p>
          </table:table-cell>
        </table:table-row>
        <table:table-row table:style-name="Table3.42">
          <table:table-cell table:style-name="Table3.A2" office:value-type="string">
            <text:p text:style-name="Table_20_Contents"><text:a xlink:type="simple" xlink:href="bible://AVs/Heb%206:18" text:style-name="Internet_20_link" text:visited-style-name="Visited_20_Internet_20_Link"><text:bookmark text:name="Heb Copy 68"/><text:span text:style-name="T6">Heb 6:18</text:span></text:a><text:span text:style-name="T7"> </text:span></text:p>
          </table:table-cell>
          <table:table-cell table:style-name="Table3.B2" office:value-type="string">
            <text:p text:style-name="P3">That by two immutable things, in which <text:span text:style-name="T2">it was</text:span> impossible for God to lie, we might have a strong consolation, who have fled for refuge to lay hold upon the hope[<text:span text:style-name="T8">G1680</text:span>] set before us: </text:p>
          </table:table-cell>
        </table:table-row>
        <table:table-row table:style-name="Table3.1">
          <table:table-cell table:style-name="Table3.A2" office:value-type="string">
            <text:p text:style-name="Table_20_Contents"><text:a xlink:type="simple" xlink:href="bible://AVs/Heb%207:19" text:style-name="Internet_20_link" text:visited-style-name="Visited_20_Internet_20_Link"><text:bookmark text:name="Heb Copy 69"/><text:span text:style-name="T6">Heb 7:19</text:span></text:a><text:span text:style-name="T7"> </text:span></text:p>
          </table:table-cell>
          <table:table-cell table:style-name="Table3.B2" office:value-type="string">
            <text:p text:style-name="P3">For the law made nothing perfect, but the<text:a xlink:type="simple" xlink:href="../../../Apps/Bible%20Analyzer%205.6%20Portable/bibleFN/AVs/Heb%207:19://3" text:style-name="Internet_20_link" text:visited-style-name="Visited_20_Internet_20_Link"><text:span text:style-name="T9">3</text:span></text:a> bringing in of a better hope[<text:span text:style-name="T8">G1680</text:span>] <text:span text:style-name="T2">did</text:span>; by the which we draw nigh unto God. </text:p>
          </table:table-cell>
        </table:table-row>
        <table:table-row table:style-name="Table3.44">
          <table:table-cell table:style-name="Table3.A2" office:value-type="string">
            <text:p text:style-name="Table_20_Contents"><text:a xlink:type="simple" xlink:href="bible://AVs/Heb%2010:23" text:style-name="Internet_20_link" text:visited-style-name="Visited_20_Internet_20_Link"><text:bookmark text:name="Heb Copy 70"/><text:span text:style-name="T6">Heb 10:23</text:span></text:a><text:span text:style-name="T7"> </text:span></text:p>
          </table:table-cell>
          <table:table-cell table:style-name="Table3.B2" office:value-type="string">
            <text:p text:style-name="P3">Let us hold fast the profession of <text:span text:style-name="T2">our</text:span> faith[<text:span text:style-name="T8">G1680</text:span>] without wavering; (for he <text:span text:style-name="T2">is</text:span> faithful that promised;) </text:p>
          </table:table-cell>
        </table:table-row>
        <table:table-row table:style-name="Table3.1">
          <table:table-cell table:style-name="Table3.A2" office:value-type="string">
            <text:p text:style-name="Table_20_Contents"><text:a xlink:type="simple" xlink:href="bible://AVs/1Pe%201:3" text:style-name="Internet_20_link" text:visited-style-name="Visited_20_Internet_20_Link"><text:bookmark text:name="1Pe Copy 11"/><text:span text:style-name="T6">1Pe 1:3</text:span></text:a><text:span text:style-name="T7"> </text:span></text:p>
          </table:table-cell>
          <table:table-cell table:style-name="Table3.B2" office:value-type="string">
            <text:p text:style-name="P3">Blessed <text:span text:style-name="T2">be</text:span> the God and Father of our Lord Jesus Christ, which according to his abundant<text:a xlink:type="simple" xlink:href="../../../Apps/Bible%20Analyzer%205.6%20Portable/bibleFN/AVs/1Pe%201:3://1" text:style-name="Internet_20_link" text:visited-style-name="Visited_20_Internet_20_Link"><text:span text:style-name="T9">1</text:span></text:a> mercy hath begotten us again unto a lively hope[<text:span text:style-name="T8">G1680</text:span>] by the resurrection of Jesus Christ from the dead, </text:p>
          </table:table-cell>
        </table:table-row>
        <table:table-row table:style-name="Table3.46">
          <table:table-cell table:style-name="Table3.A2" office:value-type="string">
            <text:p text:style-name="Table_20_Contents"><text:a xlink:type="simple" xlink:href="bible://AVs/1Pe%201:21" text:style-name="Internet_20_link" text:visited-style-name="Visited_20_Internet_20_Link"><text:bookmark text:name="1Pe Copy 12"/><text:span text:style-name="T6">1Pe 1:21</text:span></text:a><text:span text:style-name="T7"> </text:span></text:p>
          </table:table-cell>
          <table:table-cell table:style-name="Table3.B2" office:value-type="string">
            <text:p text:style-name="P3">Who by him do believe in God, that raised him up from the dead, and gave him glory; that your faith and hope[<text:span text:style-name="T8">G1680</text:span>] might be in God. </text:p>
          </table:table-cell>
        </table:table-row>
        <table:table-row table:style-name="Table3.1">
          <table:table-cell table:style-name="Table3.A2" office:value-type="string">
            <text:p text:style-name="Table_20_Contents"><text:a xlink:type="simple" xlink:href="bible://AVs/1Pe%203:15" text:style-name="Internet_20_link" text:visited-style-name="Visited_20_Internet_20_Link"><text:bookmark text:name="1Pe Copy 13"/><text:span text:style-name="T6">1Pe 3:15</text:span></text:a><text:span text:style-name="T7"> </text:span></text:p>
          </table:table-cell>
          <table:table-cell table:style-name="Table3.B2" office:value-type="string">
            <text:p text:style-name="P3">But sanctify the Lord God in your hearts: and <text:span text:style-name="T2">be</text:span> ready always to <text:span text:style-name="T2">give</text:span> an answer to every man that asketh you a reason of the hope[<text:span text:style-name="T8">G1680</text:span>] that is in you with meekness and fear:<text:a xlink:type="simple" xlink:href="../../../Apps/Bible%20Analyzer%205.6%20Portable/bibleFN/AVs/1Pe%203:15://4" text:style-name="Internet_20_link" text:visited-style-name="Visited_20_Internet_20_Link"><text:span text:style-name="T9">4</text:span></text:a> </text:p>
          </table:table-cell>
        </table:table-row>
        <table:table-row table:style-name="Table3.48">
          <table:table-cell table:style-name="Table3.A2" office:value-type="string">
            <text:p text:style-name="Table_20_Contents"><text:a xlink:type="simple" xlink:href="bible://AVs/1Jo%203:3" text:style-name="Internet_20_link" text:visited-style-name="Visited_20_Internet_20_Link"><text:bookmark text:name="1Jo Copy 2"/><text:span text:style-name="T6">1Jo 3:3</text:span></text:a><text:span text:style-name="T7"> </text:span></text:p>
          </table:table-cell>
          <table:table-cell table:style-name="Table3.B2" office:value-type="string">
            <text:p text:style-name="P3">And every man that hath this hope[<text:span text:style-name="T8">G1680</text:span>] in him purifieth himself, even as he is pure. </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2T14:45:09.313177000</meta:creation-date>
    <dc:title>default</dc:title>
    <meta:editing-duration>PT23M49S</meta:editing-duration>
    <meta:editing-cycles>21</meta:editing-cycles>
    <meta:generator>LibreOffice/26.2.4.2$Linux_X86_64 LibreOffice_project/64a984c51f4702dbd3710b13428c673a2f1292e7</meta:generator>
    <meta:initial-creator>William K. McDannell Jr.</meta:initial-creator>
    <dc:date>2026-07-11T12:31:41.204599222</dc:date>
    <meta:document-statistic meta:table-count="3" meta:image-count="0" meta:object-count="0" meta:page-count="14" meta:paragraph-count="568" meta:word-count="7465" meta:character-count="41747" meta:non-whitespace-character-count="34290"/>
    <meta:template xlink:type="simple" xlink:actuate="onRequest" xlink:title="default" xlink:href="../../../../../AppData/Roaming/LibreOffice/4/user/template/default.ott" meta:date="2025-10-12T14:45:08.996349700"/>
  </office:meta>
</office:document-meta>
</file>