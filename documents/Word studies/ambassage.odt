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P1" style:family="paragraph" style:parent-style-name="Table_20_Contents">
      <style:text-properties style:font-name="Liberation Sans"/>
    </style:style>
    <style:style style:name="P2" style:family="paragraph" style:parent-style-name="Standard">
      <style:text-properties style:font-name="Liberation Sans" officeooo:rsid="001e2247" officeooo:paragraph-rsid="001e2247"/>
    </style:style>
    <style:style style:name="P3" style:family="paragraph" style:parent-style-name="Standard">
      <style:text-properties style:font-name="Liberation Sans" officeooo:rsid="001fb65a" officeooo:paragraph-rsid="00271bcc"/>
    </style:style>
    <style:style style:name="P4" style:family="paragraph" style:parent-style-name="Standard">
      <style:text-properties style:font-name="Liberation Sans" officeooo:rsid="001fb65a" officeooo:paragraph-rsid="00223f7f"/>
    </style:style>
    <style:style style:name="P5" style:family="paragraph" style:parent-style-name="Standard">
      <style:text-properties style:font-name="Liberation Sans" officeooo:rsid="00232b52" officeooo:paragraph-rsid="0047befe"/>
    </style:style>
    <style:style style:name="P6" style:family="paragraph" style:parent-style-name="Standard">
      <style:text-properties style:font-name="Liberation Sans" officeooo:rsid="00232b52" officeooo:paragraph-rsid="00232b52"/>
    </style:style>
    <style:style style:name="P7" style:family="paragraph" style:parent-style-name="Standard">
      <style:text-properties style:font-name="Liberation Sans" officeooo:rsid="00232b52" officeooo:paragraph-rsid="003a718a"/>
    </style:style>
    <style:style style:name="P8" style:family="paragraph" style:parent-style-name="Standard">
      <style:text-properties style:font-name="Liberation Sans" officeooo:rsid="00232b52" officeooo:paragraph-rsid="00317d0e"/>
    </style:style>
    <style:style style:name="P9" style:family="paragraph" style:parent-style-name="Standard">
      <style:text-properties style:font-name="Liberation Sans" officeooo:rsid="001fb65a" officeooo:paragraph-rsid="001fb65a"/>
    </style:style>
    <style:style style:name="P10" style:family="paragraph" style:parent-style-name="Standard">
      <style:text-properties style:font-name="Liberation Sans" officeooo:rsid="00223f7f" officeooo:paragraph-rsid="00223f7f"/>
    </style:style>
    <style:style style:name="T1" style:family="text">
      <style:text-properties fo:color="#127622" loext:opacity="100%"/>
    </style:style>
    <style:style style:name="T2" style:family="text">
      <style:text-properties style:text-position="super 58%"/>
    </style:style>
    <style:style style:name="T3" style:family="text">
      <style:text-properties fo:background-color="#ffff00" loext:char-shading-value="0"/>
    </style:style>
    <style:style style:name="T4" style:family="text">
      <style:text-properties style:text-position="super 58%" officeooo:rsid="00223f7f" fo:background-color="transparent" loext:char-shading-value="0"/>
    </style:style>
    <style:style style:name="T5" style:family="text">
      <style:text-properties officeooo:rsid="00223f7f"/>
    </style:style>
    <style:style style:name="T6" style:family="text">
      <style:text-properties officeooo:rsid="0025f0c0"/>
    </style:style>
    <style:style style:name="T7" style:family="text">
      <style:text-properties fo:font-style="italic" officeooo:rsid="00223f7f" style:font-style-asian="italic" style:font-style-complex="italic"/>
    </style:style>
    <style:style style:name="T8" style:family="text">
      <style:text-properties officeooo:rsid="0028f84c"/>
    </style:style>
    <style:style style:name="T9" style:family="text">
      <style:text-properties officeooo:rsid="0043033b"/>
    </style:style>
    <style:style style:name="T10" style:family="text">
      <style:text-properties officeooo:rsid="00349373"/>
    </style:style>
    <style:style style:name="T11" style:family="text">
      <style:text-properties officeooo:rsid="002b19d5"/>
    </style:style>
    <style:style style:name="T12" style:family="text">
      <style:text-properties officeooo:rsid="003c5cd8"/>
    </style:style>
    <style:style style:name="T13" style:family="text">
      <style:text-properties officeooo:rsid="0045fb90"/>
    </style:style>
    <style:style style:name="T14" style:family="text">
      <style:text-properties officeooo:rsid="0044feb4"/>
    </style:style>
    <style:style style:name="T15" style:family="text">
      <style:text-properties officeooo:rsid="00532c39"/>
    </style:style>
    <style:style style:name="T16" style:family="text">
      <style:text-properties officeooo:rsid="00308527"/>
    </style:style>
    <style:style style:name="T17" style:family="text">
      <style:text-properties officeooo:rsid="0024411c"/>
    </style:style>
    <style:style style:name="T18" style:family="text">
      <style:text-properties officeooo:rsid="00314754"/>
    </style:style>
    <style:style style:name="T19" style:family="text">
      <style:text-properties officeooo:rsid="0048e91b"/>
    </style:style>
    <style:style style:name="T20" style:family="text">
      <style:text-properties officeooo:rsid="00497e63"/>
    </style:style>
    <style:style style:name="T21" style:family="text">
      <style:text-properties officeooo:rsid="004957c9"/>
    </style:style>
    <style:style style:name="T22" style:family="text">
      <style:text-properties fo:font-style="italic" style:font-style-asian="italic" style:font-style-complex="italic"/>
    </style:style>
    <style:style style:name="T23" style:family="text">
      <style:text-properties officeooo:rsid="00379546"/>
    </style:style>
    <style:style style:name="T24" style:family="text">
      <style:text-properties fo:color="#127622" loext:opacity="100%" officeooo:rsid="00379546"/>
    </style:style>
    <style:style style:name="T25" style:family="text">
      <style:text-properties officeooo:rsid="0039582e"/>
    </style:style>
    <style:style style:name="T26" style:family="text">
      <style:text-properties officeooo:rsid="004b67f0"/>
    </style:style>
    <style:style style:name="T27" style:family="text">
      <style:text-properties officeooo:rsid="003a718a"/>
    </style:style>
    <style:style style:name="T28" style:family="text">
      <style:text-properties officeooo:rsid="003cfc9c"/>
    </style:style>
    <style:style style:name="T29" style:family="text">
      <style:text-properties fo:color="#127622" loext:opacity="100%" officeooo:rsid="003cfc9c"/>
    </style:style>
    <style:style style:name="T30" style:family="text">
      <style:text-properties officeooo:rsid="0047befe"/>
    </style:style>
    <style:style style:name="T31" style:family="text">
      <style:text-properties officeooo:rsid="004bd7a8"/>
    </style:style>
    <style:style style:name="T32" style:family="text">
      <style:text-properties officeooo:rsid="004b6eaf"/>
    </style:style>
    <style:style style:name="T33" style:family="text">
      <style:text-properties officeooo:rsid="004bd9da"/>
    </style:style>
    <style:style style:name="T34" style:family="text">
      <style:text-properties fo:color="#127622" loext:opacity="100%" officeooo:rsid="004c391b"/>
    </style:style>
    <style:style style:name="T35" style:family="text">
      <style:text-properties officeooo:rsid="004c391b"/>
    </style:style>
    <style:style style:name="T36" style:family="text">
      <style:text-properties fo:color="#127622" loext:opacity="100%" officeooo:rsid="004e1da7"/>
    </style:style>
    <style:style style:name="T37" style:family="text">
      <style:text-properties officeooo:rsid="004e1da7"/>
    </style:style>
    <style:style style:name="T38" style:family="text">
      <style:text-properties fo:color="#127622" loext:opacity="100%" officeooo:rsid="004bd9da"/>
    </style:style>
    <style:style style:name="T39" style:family="text">
      <style:text-properties officeooo:rsid="00303345"/>
    </style:style>
    <style:style style:name="T40" style:family="text">
      <style:text-properties officeooo:rsid="0041d4c1"/>
    </style:style>
    <style:style style:name="T41" style:family="text">
      <style:text-properties officeooo:rsid="002f5b32"/>
    </style:style>
    <style:style style:name="T42" style:family="text">
      <style:text-properties fo:font-style="italic" officeooo:rsid="002f5b32" style:font-style-asian="italic" style:font-style-complex="italic"/>
    </style:style>
    <style:style style:name="T43" style:family="text">
      <style:text-properties fo:color="#127622" loext:opacity="100%" officeooo:rsid="0047befe"/>
    </style:style>
    <style:style style:name="T44" style:family="text">
      <style:text-properties officeooo:rsid="005019f0"/>
    </style:style>
    <style:style style:name="T45" style:family="text">
      <style:text-properties officeooo:rsid="00507145"/>
    </style:style>
    <style:style style:name="T46" style:family="text">
      <style:text-properties fo:color="#127622" loext:opacity="100%" officeooo:rsid="005598c5"/>
    </style:style>
    <style:style style:name="T47" style:family="text">
      <style:text-properties officeooo:rsid="005598c5"/>
    </style:style>
    <style:style style:name="T48" style:family="text">
      <style:text-properties fo:color="#127622" loext:opacity="100%" officeooo:rsid="0050c4aa"/>
    </style:style>
    <style:style style:name="T49" style:family="text">
      <style:text-properties officeooo:rsid="0050c4aa"/>
    </style:style>
    <style:style style:name="T50" style:family="text">
      <style:text-properties fo:color="#127622" loext:opacity="100%" officeooo:rsid="00507145"/>
    </style:style>
    <style:style style:name="T51" style:family="text">
      <style:text-properties officeooo:rsid="004ecd23"/>
    </style:style>
    <style:style style:name="T52" style:family="text">
      <style:text-properties officeooo:rsid="0031f2eb"/>
    </style:style>
    <style:style style:name="T53" style:family="text">
      <style:text-properties officeooo:rsid="003ea867"/>
    </style:style>
    <style:style style:name="T54" style:family="text">
      <style:text-properties officeooo:rsid="005606b1"/>
    </style:style>
    <style:style style:name="T55" style:family="text">
      <style:text-properties fo:color="#127622" loext:opacity="100%" officeooo:rsid="005606b1"/>
    </style:style>
    <style:style style:name="T56" style:family="text">
      <style:text-properties fo:font-style="italic"/>
    </style:style>
    <style:style style:name="T57" style:family="text">
      <style:text-properties fo:font-style="italic" officeooo:rsid="0051aac6" style:font-style-asian="italic" style:font-style-complex="italic"/>
    </style:style>
    <style:style style:name="T58" style:family="text">
      <style:text-properties officeooo:rsid="0051aac6"/>
    </style:style>
    <style:style style:name="T59" style:family="text">
      <style:text-properties officeooo:rsid="00414511"/>
    </style:style>
    <style:style style:name="T60" style:family="text">
      <style:text-properties officeooo:rsid="003f3492"/>
    </style:style>
    <style:style style:name="T61" style:family="text">
      <style:text-properties officeooo:rsid="003fff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text:span text:style-name="T1">Luke 14:31-33</text:span><text:line-break/><text:span text:style-name="T2">31</text:span> Or what king, going to make war against another king, sitteth not down first, and consulteth whether he be able with ten thousand to meet him that cometh against him with twenty thousand? <text:line-break/><text:span text:style-name="T2">32</text:span> Or else, while the other is yet a great way off, he sendeth <text:span text:style-name="T3">an ambassage</text:span><text:span text:style-name="T4">G4242</text:span>, and desireth conditions of peace. <text:line-break/><text:span text:style-name="T2">33</text:span> So likewise, whosoever he be of you that forsaketh not all that he hath, he cannot be my disciple.</text:p>
          </table:table-cell>
        </table:table-row>
      </table:table>
      <text:p text:style-name="P2"/>
      <text:p text:style-name="P3">The English word “ambassage” appears once in the entire Bible and so, <text:span text:style-name="T5">like </text:span><text:span text:style-name="T6">the 4,001 </text:span><text:span text:style-name="T5">other</text:span><text:span text:style-name="T6"> </text:span><text:span text:style-name="T7">hapax legomenon</text:span><text:span text:style-name="T5">, </text:span>it could be <text:span text:style-name="T8">challenging</text:span> to <text:span text:style-name="T9">obtain the Biblical</text:span> definition of this word<text:span text:style-name="T10">.</text:span></text:p>
      <text:p text:style-name="P4"/>
      <text:p text:style-name="P5">To compound the difficulty, this word does not appear in Noah Websters 1828 dictionary. <text:span text:style-name="T11">Note that </text:span><text:span text:style-name="T12">it</text:span><text:span text:style-name="T11"> does appear in the Webster</text:span><text:span text:style-name="T13">s </text:span><text:span text:style-name="T11">1913 dictionary </text:span><text:span text:style-name="T13">where it </text:span><text:span text:style-name="T14">equates “ambassage” to “embassage” which is not a word that appears in the Bible. </text:span><text:span text:style-name="T13">Additionally, the sources for the definitions for “ambassage” in Websters 1913 dictionary explicit state that they come from </text:span><text:span text:style-name="T15">non</text:span><text:span text:style-name="T13">-Biblical sources.</text:span></text:p>
      <text:p text:style-name="P6"/>
      <text:p text:style-name="P7"><text:span text:style-name="T16">T</text:span><text:span text:style-name="T17">he peg words </text:span><text:span text:style-name="T18">(words that surround the word in question) </text:span><text:span text:style-name="T17">do not exist anywhere else in scripture </text:span><text:span text:style-name="T19">so confirming a parallel concept would likely not be </text:span><text:span text:style-name="T20">wholly </text:span><text:span text:style-name="T21">free from</text:span><text:span text:style-name="T19"> doubt.</text:span></text:p>
      <text:p text:style-name="P7"/>
      <text:p text:style-name="P7">We could <text:span text:style-name="T22">guess</text:span> the definition based on the context; <text:span text:style-name="T23">however, guessing begets opinions and opinions beget confusion and God is not the author of confusion (</text:span><text:span text:style-name="T24">1Cor 14:33</text:span><text:span text:style-name="T23">). </text:span><text:span text:style-name="T25">And thus it’s always safe to assume that the Lord provided a way to definitively confirm </text:span><text:span text:style-name="T26">His </text:span><text:span text:style-name="T25">word definitions </text:span><text:span text:style-name="T27">and they will never change </text:span><text:span text:style-name="T28">(</text:span><text:span text:style-name="T29">Mal 3:6a</text:span><text:span text:style-name="T28">)</text:span><text:span text:style-name="T27">.</text:span></text:p>
      <text:p text:style-name="P8"/>
      <text:p text:style-name="P5"><text:span text:style-name="T30">So, we don’t have a Biblically-sourced dictionary definition, we have no peg words, </text:span><text:span text:style-name="T31">no </text:span><text:span text:style-name="T32">parallel verses</text:span><text:span text:style-name="T30">, </text:span><text:span text:style-name="T31">no parallel passages, </text:span><text:span text:style-name="T30">and </text:span><text:span text:style-name="T31">we dare not guess </text:span><text:span text:style-name="T33">(</text:span><text:span text:style-name="T34">Mat 23:3</text:span><text:span text:style-name="T35">, </text:span><text:span text:style-name="T36">Luk 12:47,48</text:span><text:span text:style-name="T37">, </text:span><text:span text:style-name="T38">Jam 3:1</text:span><text:span text:style-name="T37">)</text:span><text:span text:style-name="T30">. H</text:span><text:span text:style-name="T39">ow </text:span><text:span text:style-name="T40">then </text:span><text:span text:style-name="T41">can we confirm </text:span><text:span text:style-name="T42">with scripture</text:span><text:span text:style-name="T41"> the definition of this word? </text:span><text:span text:style-name="T30">In </text:span><text:span text:style-name="T43">1Cor 2:13d</text:span><text:span text:style-name="T30"> God’s word gives us a clue: use God’s word! </text:span><text:span text:style-name="T44">English is not the first language God has used to preserve His word and </text:span><text:span text:style-name="T45">it will also not be the last (</text:span><text:span text:style-name="T46">John 1:45</text:span><text:span text:style-name="T47">, </text:span><text:span text:style-name="T48">Act 4:12</text:span><text:span text:style-name="T49">, </text:span><text:span text:style-name="T48">Rom 1:16</text:span><text:span text:style-name="T49">, </text:span><text:span text:style-name="T48">Rev 5:9</text:span><text:span text:style-name="T49">, </text:span><text:span text:style-name="T50">Rev 14:6,7</text:span><text:span text:style-name="T45">).</text:span></text:p>
      <text:p text:style-name="P4"/>
      <text:p text:style-name="P4"><text:span text:style-name="T51">T</text:span>he Strong’s number for “<text:span text:style-name="T52">ambassage”, which is </text:span>G4242, appears elsewhere in scripture <text:span text:style-name="T53">making the total count exactly two </text:span><text:span text:style-name="T54">(</text:span><text:span text:style-name="T55">Num 35:30</text:span><text:span text:style-name="T54">, </text:span><text:span text:style-name="T55">Mat 18:16</text:span><text:span text:style-name="T54">).</text:span></text:p>
      <text:p text:style-name="P9"/>
      <table:table table:name="Table2" table:style-name="Table2">
        <table:table-column table:style-name="Table2.A"/>
        <table:table-row>
          <table:table-cell table:style-name="Table2.A1" office:value-type="string">
            <text:p text:style-name="P1"><text:span text:style-name="T1">Luke 19:12-15</text:span><text:line-break/><text:span text:style-name="T2">12</text:span> He said therefore, A certain nobleman went into a far country to receive for himself a kingdom, and to return. <text:line-break/><text:span text:style-name="T2">13</text:span> And he called his ten servants, and delivered them ten pounds, and said unto them, Occupy till I come. <text:line-break/><text:span text:style-name="T2">14</text:span> But his citizens hated him, and sent <text:span text:style-name="T3">a message</text:span><text:span text:style-name="T4">G4242</text:span> after him, saying, We will not have this <text:span text:style-name="T56">man</text:span> to reign over us. <text:line-break/><text:span text:style-name="T2">15</text:span> And it came to pass, that when he was returned, having received the kingdom, then he commanded these servants to be called unto him, to whom he had given the money, that he might know how much every man had gained by trading.</text:p>
          </table:table-cell>
        </table:table-row>
      </table:table>
      <text:p text:style-name="P9"/>
      <text:p text:style-name="P10">And so we learn <text:span text:style-name="T57">from scripture</text:span><text:span text:style-name="T58"> </text:span>that “<text:span text:style-name="T59">an </text:span><text:span text:style-name="T60">ambassage” is “a message” and “</text:span><text:span text:style-name="T61">a message” is “</text:span><text:span text:style-name="T59">an </text:span><text:span text:style-name="T61">ambass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15:46:14.702000000</meta:creation-date>
    <meta:generator>LibreOffice/26.2.4.2$Linux_X86_64 LibreOffice_project/64a984c51f4702dbd3710b13428c673a2f1292e7</meta:generator>
    <dc:date>2026-07-11T12:31:38.814867197</dc:date>
    <meta:editing-duration>PT6H2M35S</meta:editing-duration>
    <meta:editing-cycles>66</meta:editing-cycles>
    <meta:document-statistic meta:table-count="2" meta:image-count="0" meta:object-count="0" meta:page-count="1" meta:paragraph-count="9" meta:word-count="485" meta:character-count="2762" meta:non-whitespace-character-count="2281"/>
  </office:meta>
</office:document-meta>
</file>