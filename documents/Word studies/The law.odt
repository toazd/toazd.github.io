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11376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Table_20_Contents">
      <style:text-properties fo:color="#ff0000" loext:opacity="100%"/>
    </style:style>
    <style:style style:name="P3" style:family="paragraph" style:parent-style-name="Table_20_Contents">
      <style:text-properties style:use-window-font-color="true" loext:opacity="0%"/>
    </style:style>
    <style:style style:name="P4" style:family="paragraph" style:parent-style-name="Standard" style:list-style-name="L1">
      <style:text-properties officeooo:rsid="001542a5" officeooo:paragraph-rsid="001542a5"/>
    </style:style>
    <style:style style:name="P5" style:family="paragraph" style:parent-style-name="Standard">
      <style:text-properties officeooo:rsid="001542a5" officeooo:paragraph-rsid="001542a5"/>
    </style:style>
    <style:style style:name="P6" style:family="paragraph" style:parent-style-name="Standard" style:list-style-name="L2">
      <style:text-properties officeooo:rsid="00173b1b" officeooo:paragraph-rsid="00173b1b"/>
    </style:style>
    <style:style style:name="P7" style:family="paragraph" style:parent-style-name="Standard">
      <style:text-properties officeooo:rsid="00173b1b" officeooo:paragraph-rsid="00173b1b"/>
    </style:style>
    <style:style style:name="P8" style:family="paragraph" style:parent-style-name="Standard" style:list-style-name="L3">
      <style:text-properties officeooo:rsid="00173b1b" officeooo:paragraph-rsid="00173b1b"/>
    </style:style>
    <style:style style:name="P9" style:family="paragraph" style:parent-style-name="Standard" style:list-style-name="L3">
      <style:text-properties officeooo:rsid="001bfced" officeooo:paragraph-rsid="001bfced"/>
    </style:style>
    <style:style style:name="P10" style:family="paragraph" style:parent-style-name="Standard">
      <style:text-properties officeooo:rsid="001bfced" officeooo:paragraph-rsid="001bfced"/>
    </style:style>
    <style:style style:name="P11" style:family="paragraph" style:parent-style-name="Table_20_Contents">
      <style:text-properties officeooo:paragraph-rsid="001c05b1"/>
    </style:style>
    <style:style style:name="P12" style:family="paragraph" style:parent-style-name="Standard" style:list-style-name="L4">
      <style:text-properties officeooo:rsid="001bfced" officeooo:paragraph-rsid="001bfced"/>
    </style:style>
    <style:style style:name="P13" style:family="paragraph" style:parent-style-name="Standard" style:list-style-name="L4">
      <style:text-properties officeooo:rsid="001c05b1" officeooo:paragraph-rsid="001c05b1"/>
    </style:style>
    <style:style style:name="T1" style:family="text">
      <style:text-properties fo:font-variant="normal" fo:text-transform="none" fo:color="#000000" loext:opacity="100%" fo:font-family="Gabriela, sans-serif" fo:font-size="15pt" fo:letter-spacing="normal" fo:font-style="normal" fo:font-weight="bold"/>
    </style:style>
    <style:style style:name="T2" style:family="text">
      <style:text-properties fo:color="#127622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background-color="#fff5ce" loext:char-shading-value="0"/>
    </style:style>
    <style:style style:name="T5" style:family="text">
      <style:text-properties style:use-window-font-color="true" loext:opacity="0%"/>
    </style:style>
    <style:style style:name="T6" style:family="text">
      <style:text-properties fo:background-color="#fff5ce" loext:char-shading-value="0"/>
    </style:style>
    <style:style style:name="T7" style:family="text">
      <style:text-properties officeooo:rsid="00188cb3"/>
    </style:style>
    <style:style style:name="T8" style:family="text">
      <style:text-properties style:text-position="33% 8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3551</text:span>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2">Matthew 7:12</text:span><text:line-break/><text:span text:style-name="T3">Therefore all things whatsoever ye would that men should do to you, do ye even so to them: for this is </text:span><text:span text:style-name="T4">the law</text:span><text:span text:style-name="T3"> and the prophets.</text:span></text:p>
            <text:p text:style-name="P2"/>
            <text:p text:style-name="P2"><text:span text:style-name="T2">Matthew 22:40</text:span><text:span text:style-name="T5"><text:line-break/></text:span>On these two commandments hang all the law and the prophets.</text:p>
            <text:p text:style-name="P2"/>
            <text:p text:style-name="P2"><text:span text:style-name="T2">Luke 16:16</text:span><text:line-break/><text:span text:style-name="T6">The law</text:span> and the prophets were until John: since that time the kingdom of God is preached, and every man presseth into it.</text:p>
            <text:p text:style-name="P2"/>
            <text:p text:style-name="P3"><text:span text:style-name="T2">Luke 24:44</text:span><text:line-break/>And he said unto them, <text:span text:style-name="T3">These are the words which I spake unto you, while I was yet with you, that all things must be fulfilled, which were written in </text:span><text:span text:style-name="T4">the law</text:span><text:span text:style-name="T3"> of Moses, and in the prophets, and in the psalms, concerning me.</text:span></text:p>
          </table:table-cell>
        </table:table-row>
      </table:table>
      <text:list text:style-name="L1">
        <text:list-item>
          <text:p text:style-name="P4">“<text:span text:style-name="T7">the law”</text:span></text:p>
        </text:list-item>
        <text:list-item>
          <text:p text:style-name="P4">The first five books of the Bible: Genesis, Exodus, Leviticus, Numbers, Deuteronomy.</text:p>
        </text:list-item>
      </text:list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John 10:34</text:span><text:line-break/>Jesus answered them, <text:span text:style-name="T3">Is it not written </text:span><text:span text:style-name="T4">in your law</text:span><text:span text:style-name="T3">, I said, Ye are gods?</text:span></text:p>
            <text:p text:style-name="P2"/>
            <text:p text:style-name="P2"><text:span text:style-name="T2">Psalms 82:6</text:span><text:line-break/><text:span text:style-name="T5">I have said, Ye are gods; and all of you are children of the most High.</text:span></text:p>
          </table:table-cell>
        </table:table-row>
      </table:table>
      <text:list text:style-name="L2">
        <text:list-item>
          <text:p text:style-name="P6">“<text:span text:style-name="T7">your law”</text:span></text:p>
        </text:list-item>
        <text:list-item>
          <text:p text:style-name="P6">The Psalms.</text:p>
        </text:list-item>
      </text:list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2">John 15:25</text:span><text:line-break/><text:span text:style-name="T3">But this cometh to pass, that the word might be fulfilled that is written </text:span><text:span text:style-name="T4">in their law</text:span><text:span text:style-name="T3">, They hated me without a cause.</text:span></text:p>
            <text:p text:style-name="Table_20_Contents"/>
            <text:p text:style-name="Table_20_Contents"><text:span text:style-name="T2">Psalms 35:19</text:span><text:line-break/>Let not them that are mine enemies wrongfully rejoice over me:<text:line-break/>neither let them wink with the eye that hate me without a cause.</text:p>
            <text:p text:style-name="Table_20_Contents"/>
            <text:p text:style-name="Table_20_Contents"><text:span text:style-name="T2">Psalms 69:4</text:span><text:line-break/>They that hate me without a cause are more than the hairs of mine head:<text:line-break/>they that would destroy me, being mine enemies wrongfully, are mighty:<text:line-break/>then I restored that which I took not away.</text:p>
          </table:table-cell>
        </table:table-row>
      </table:table>
      <text:list text:style-name="L3">
        <text:list-item>
          <text:p text:style-name="P8">“<text:span text:style-name="T7">their law”</text:span></text:p>
        </text:list-item>
        <text:list-item>
          <text:p text:style-name="P9">The Psalms.</text:p>
        </text:list-item>
      </text:list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1 Corinthians 14:21<text:line-break/>In <text:span text:style-name="T6">the law</text:span> it is written, With men of other tongues and other lips will I speak unto this people; and yet for all that will they not hear me, saith the Lord.</text:p>
            <text:p text:style-name="Table_20_Contents"/>
            <text:p text:style-name="P11">Isaiah 28:11-12<text:line-break/><text:span text:style-name="T8">11</text:span> For with stammering lips and another tongue will he speak to this people. <text:span text:style-name="T8">12</text:span> To whom he said, This is the rest wherewith ye may cause the weary to rest; and this is the refreshing: yet they would not hear.</text:p>
          </table:table-cell>
        </table:table-row>
      </table:table>
      <text:list text:style-name="L4">
        <text:list-item>
          <text:p text:style-name="P12">“the law”</text:p>
        </text:list-item>
        <text:list-item>
          <text:p text:style-name="P13">Isaiah (or, the prophet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2:10:06.855887200</meta:creation-date>
    <dc:title>default</dc:title>
    <meta:editing-duration>PT26M42S</meta:editing-duration>
    <meta:editing-cycles>15</meta:editing-cycles>
    <meta:generator>LibreOffice/25.8.1.1$Windows_X86_64 LibreOffice_project/54047653041915e595ad4e45cccea684809c77b5</meta:generator>
    <dc:date>2025-09-12T12:36:56.016502100</dc:date>
    <meta:document-statistic meta:table-count="4" meta:image-count="0" meta:object-count="0" meta:page-count="1" meta:paragraph-count="20" meta:word-count="351" meta:character-count="1798" meta:non-whitespace-character-count="1474"/>
    <meta:template xlink:type="simple" xlink:actuate="onRequest" xlink:title="default" xlink:href="../../../../../AppData/Roaming/LibreOffice/4/user/template/default.ott" meta:date="2025-09-12T12:10:05.815223600"/>
  </office:meta>
</office:document-meta>
</file>