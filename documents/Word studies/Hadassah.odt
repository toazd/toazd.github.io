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0E4C3B79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014in" fo:margin-left="0in" table:align="left"/>
    </style:style>
    <style:style style:name="Table2.A" style:family="table-column">
      <style:table-column-properties style:column-width="0.7806in"/>
    </style:style>
    <style:style style:name="Table2.B" style:family="table-column">
      <style:table-column-properties style:column-width="7.1208in"/>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text-properties style:font-name="Liberation Sans" fo:font-size="12pt" style:font-size-asian="12pt" style:font-size-complex="12pt"/>
    </style:style>
    <style:style style:name="P2" style:family="paragraph" style:parent-style-name="Standard">
      <style:text-properties style:font-name="Liberation Sans" fo:font-size="12pt" style:font-size-asian="12pt" style:font-size-complex="12pt"/>
    </style:style>
    <style:style style:name="P3" style:family="paragraph" style:parent-style-name="Standard">
      <style:text-properties style:font-name="Liberation Sans" fo:font-size="12pt" officeooo:rsid="00122b41" officeooo:paragraph-rsid="00122b41" style:font-size-asian="12pt" style:font-size-complex="12pt"/>
    </style:style>
    <style:style style:name="P4"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Liberation Sans" fo:font-size="12pt" fo:letter-spacing="normal" fo:font-style="normal" style:text-underline-style="solid" style:text-underline-width="auto" style:text-underline-color="font-color" fo:font-weight="normal" style:font-size-asian="12pt" style:font-size-complex="12pt"/>
    </style:style>
    <style:style style:name="P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6"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Liberation Sans" fo:font-size="12pt" fo:font-style="normal" fo:font-weight="normal" style:font-size-asian="12pt" style:font-size-complex="12pt"/>
    </style:style>
    <style:style style:name="P7" style:family="paragraph" style:parent-style-name="Standard">
      <style:text-properties style:font-name="Liberation Sans" fo:font-size="12pt" officeooo:rsid="0014f9c7" officeooo:paragraph-rsid="0014f9c7" style:font-size-asian="12pt" style:font-size-complex="12pt"/>
    </style:style>
    <style:style style:name="P8" style:family="paragraph" style:parent-style-name="Standard">
      <style:text-properties style:font-name="Liberation Sans" fo:font-size="12pt" officeooo:rsid="00167358" officeooo:paragraph-rsid="00167358" style:font-size-asian="12pt" style:font-size-complex="12pt"/>
    </style:style>
    <style:style style:name="T1" style:family="text">
      <style:text-properties fo:background-color="#fff5ce" loext:char-shading-value="0"/>
    </style:style>
    <style:style style:name="T2" style:family="text">
      <style:text-properties officeooo:rsid="0012fac1"/>
    </style:style>
    <style:style style:name="T3" style:family="text">
      <style:text-properties fo:background-color="#fffb00" loext:char-shading-value="0" loext:padding="0.0193in" loext:border="0.74pt solid #d8c7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sther 2:7And he brought up H539[(H8802)] <text:span text:style-name="T1">Hadassah</text:span> H1919, that [is], Esther H635, his uncle's H1730 daughter H1323: for she had neither father H1 nor mother H517, and the maid H5291 [was] fair H3303 H8389 and beautiful H2896 H4758; whom Mordecai H4782, when her father H1 and mother H517 were dead H4194, took H3947[(H8804)] for his own daughter H1323.</text:p>
          </table:table-cell>
        </table:table-row>
      </table:table>
      <text:p text:style-name="P2"/>
      <text:p text:style-name="P3">Hadassah <text:span text:style-name="T2">is </text:span>the feminine of H1918 (myrtle)</text:p>
      <text:p text:style-name="P2"/>
      <text:p text:style-name="P4">Search results for "H1918"</text:p>
      <table:table table:name="Table2" table:style-name="Table2">
        <table:table-column table:style-name="Table2.A"/>
        <table:table-column table:style-name="Table2.B"/>
        <table:table-row>
          <table:table-cell table:style-name="Table2.A1" office:value-type="string">
            <text:p text:style-name="P5">Neh 8:15</text:p>
          </table:table-cell>
          <table:table-cell table:style-name="Table2.B1" office:value-type="string">
            <text:p text:style-name="P6">And that they should publish and proclaim in all their cities, and in Jerusalem, saying, Go forth unto the mount, and fetch olive branches, and pine branches<text:span text:style-name="T3">, and myrtleH1918</text:span> branches, and palm branches, and branches of thick trees, to make booths, as it is written.</text:p>
          </table:table-cell>
        </table:table-row>
        <table:table-row>
          <table:table-cell table:style-name="Table2.A2" office:value-type="string">
            <text:p text:style-name="P5">Isa 41:19</text:p>
          </table:table-cell>
          <table:table-cell table:style-name="Table2.B2" office:value-type="string">
            <text:p text:style-name="P6">I will plant in the wilderness the cedar, the shittah tree<text:span text:style-name="T3">, and the myrtleH1918</text:span>, and the oil tree; I will set in the desert the fir tree, and the pine, and the box tree together:</text:p>
          </table:table-cell>
        </table:table-row>
        <table:table-row>
          <table:table-cell table:style-name="Table2.A2" office:value-type="string">
            <text:p text:style-name="P5">Isa 55:13</text:p>
          </table:table-cell>
          <table:table-cell table:style-name="Table2.B2" office:value-type="string">
            <text:p text:style-name="P6">Instead of the thorn shall come up the fir tree, and instead of the brier shall come up <text:span text:style-name="T3">the myrtle treeH1918</text:span>: and it shall be to the LORD for a name, for an everlasting sign that shall not be cut off.</text:p>
          </table:table-cell>
        </table:table-row>
        <table:table-row>
          <table:table-cell table:style-name="Table2.A2" office:value-type="string">
            <text:p text:style-name="P5">Zec 1:8</text:p>
          </table:table-cell>
          <table:table-cell table:style-name="Table2.B2" office:value-type="string">
            <text:p text:style-name="P6">I saw by night, and behold a man riding upon a red horse, and he stood <text:span text:style-name="T3">among the myrtle treesH1918</text:span> that were in the bottom; and behind him were there red horses, speckled, and white.</text:p>
          </table:table-cell>
        </table:table-row>
        <table:table-row>
          <table:table-cell table:style-name="Table2.A2" office:value-type="string">
            <text:p text:style-name="P5">Zec 1:10</text:p>
          </table:table-cell>
          <table:table-cell table:style-name="Table2.B2" office:value-type="string">
            <text:p text:style-name="P6">And the man that stood <text:span text:style-name="T3">among the myrtle treesH1918</text:span> answered and said, These are they whom the LORD hath sent to walk to and fro through the earth.</text:p>
          </table:table-cell>
        </table:table-row>
        <table:table-row>
          <table:table-cell table:style-name="Table2.A2" office:value-type="string">
            <text:p text:style-name="P5">Zec 1:11</text:p>
          </table:table-cell>
          <table:table-cell table:style-name="Table2.B2" office:value-type="string">
            <text:p text:style-name="P6">And they answered the angel of the LORD that stood <text:span text:style-name="T3">among the myrtle treesH1918</text:span>, and said, We have walked to and fro through the earth, and, behold, all the earth sitteth still, and is at rest.</text:p>
          </table:table-cell>
        </table:table-row>
      </table:table>
      <text:p text:style-name="P2"/>
      <text:p text:style-name="P7">In Zechariah, the myrtle is symbolic of Israel.</text:p>
      <text:p text:style-name="P7"/>
      <text:p text:style-name="P8">According to research the myrtle branches are on of the four species used to construct the temporary huts (booths) for the Sukkot festival (feast of tabernacles, feast of booths, memorial of the 40 year wandering).</text:p>
      <text:p text:style-name="P8"/>
      <text:p text:style-name="P8"><draw:frame draw:style-name="fr1" draw:name="Image1" text:anchor-type="char" svg:width="7.9in" svg:height="1.6366in" draw:z-index="0"><draw:image xlink:href="Pictures/100000010000044C000000E4C3B79ED3.png" xlink:type="simple" xlink:show="embed" xlink:actuate="onLoad" draw:mime-type="image/png"/></draw:frame>“The myrtle grows wild in the north of Israel – the Carmel, the Galilee and the Golan Heights. Currently there are 49 known sites where wild myrtles grow in Israel, most of which are outside of the national nature reserves. Due to the yearly over-harvesting of myrtle branches in the weeks before Sukkot, the wild myrtle is inכ danger of extinction and has been placed on Israel’s Red List of endangered plant species. Cultivated myrtle varieties are grown commercially not only for the Sukkot “four species” market, but also for sale as ornamental plants in gardens and as protective hedges along roadsides. There is serious <text:soft-page-break/>concern that the hybridization of the cultivated strain with the wild strain may lead to the complete disappearance of the wild myrtle.” - <text:a xlink:type="simple" xlink:href="https://www.neot-kedumim.org.il/index-plant-of-the-month/the-myrtle/" text:style-name="Internet_20_link" text:visited-style-name="Visited_20_Internet_20_Link">https://www.neot-kedumim.org.il/index-plant-of-the-month/the-myrtle/</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07:17:03.760365700</meta:creation-date>
    <dc:title>default</dc:title>
    <meta:editing-duration>PT7M57S</meta:editing-duration>
    <meta:editing-cycles>9</meta:editing-cycles>
    <meta:generator>LibreOffice/26.2.4.2$Linux_X86_64 LibreOffice_project/64a984c51f4702dbd3710b13428c673a2f1292e7</meta:generator>
    <meta:initial-creator>William K. McDannell Jr.</meta:initial-creator>
    <dc:date>2026-07-11T12:20:41.900933877</dc:date>
    <meta:document-statistic meta:table-count="2" meta:image-count="1" meta:object-count="0" meta:page-count="2" meta:paragraph-count="18" meta:word-count="472" meta:character-count="2727" meta:non-whitespace-character-count="2272"/>
    <meta:template xlink:type="simple" xlink:actuate="onRequest" xlink:title="default" xlink:href="../../../../../AppData/Roaming/LibreOffice/4/user/template/default.ott" meta:date="2025-09-22T07:17:02.725370300"/>
  </office:meta>
</office:document-meta>
</file>