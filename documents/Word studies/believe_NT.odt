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9014in" fo:margin-left="0in" table:align="left"/>
    </style:style>
    <style:style style:name="Table1.A" style:family="table-column">
      <style:table-column-properties style:column-width="0.6222in"/>
    </style:style>
    <style:style style:name="Table1.B" style:family="table-column">
      <style:table-column-properties style:column-width="5.2792in"/>
    </style:style>
    <style:style style:name="Table1.C" style:family="table-column">
      <style:table-column-properties style:column-width="2in"/>
    </style:style>
    <style:style style:name="Table1.1" style:family="table-row">
      <style:table-row-properties fo:background-color="#efefd8" fo:keep-together="always">
        <style:background-image/>
      </style:table-row-properties>
    </style:style>
    <style:style style:name="Table1.A1" style:family="table-cell">
      <style:table-cell-properties style:vertical-align="middle" fo:padding="0.0201in" fo:border-left="0.75pt solid #000000" fo:border-right="none" fo:border-top="0.75pt solid #000000" fo:border-bottom="0.75pt solid #000000"/>
    </style:style>
    <style:style style:name="Table1.C1" style:family="table-cell">
      <style:table-cell-properties style:vertical-align="middle" fo:padding="0.0201in" fo:border="0.75pt solid #000000"/>
    </style:style>
    <style:style style:name="Table1.2" style:family="table-row">
      <style:table-row-properties fo:keep-together="always"/>
    </style:style>
    <style:style style:name="Table1.A2" style:family="table-cell">
      <style:table-cell-properties style:vertical-align="middle" fo:padding="0.0201in" fo:border-left="0.75pt solid #000000" fo:border-right="none" fo:border-top="none" fo:border-bottom="0.75pt solid #000000"/>
    </style:style>
    <style:style style:name="Table1.C2" style:family="table-cell">
      <style:table-cell-properties style:vertical-align="middle" fo:padding="0.0201in" fo:border-left="0.75pt solid #000000" fo:border-right="0.75pt solid #000000" fo:border-top="none" fo:border-bottom="0.75pt solid #000000"/>
    </style:style>
    <style:style style:name="Table1.4" style:family="table-row">
      <style:table-row-properties fo:keep-together="always"/>
    </style:style>
    <style:style style:name="Table1.6" style:family="table-row">
      <style:table-row-properties fo:keep-together="always"/>
    </style:style>
    <style:style style:name="Table1.8" style:family="table-row">
      <style:table-row-properties fo:keep-together="always"/>
    </style:style>
    <style:style style:name="Table1.10" style:family="table-row">
      <style:table-row-properties fo:keep-together="always"/>
    </style:style>
    <style:style style:name="Table1.12" style:family="table-row">
      <style:table-row-properties fo:keep-together="always"/>
    </style:style>
    <style:style style:name="Table1.14" style:family="table-row">
      <style:table-row-properties fo:keep-together="always"/>
    </style:style>
    <style:style style:name="Table1.16" style:family="table-row">
      <style:table-row-properties fo:keep-together="always"/>
    </style:style>
    <style:style style:name="Table1.18" style:family="table-row">
      <style:table-row-properties fo:keep-together="always"/>
    </style:style>
    <style:style style:name="Table1.20" style:family="table-row">
      <style:table-row-properties fo:keep-together="always"/>
    </style:style>
    <style:style style:name="Table1.22" style:family="table-row">
      <style:table-row-properties fo:keep-together="always"/>
    </style:style>
    <style:style style:name="Table1.24" style:family="table-row">
      <style:table-row-properties fo:keep-together="always"/>
    </style:style>
    <style:style style:name="Table1.26" style:family="table-row">
      <style:table-row-properties fo:keep-together="always"/>
    </style:style>
    <style:style style:name="Table1.28" style:family="table-row">
      <style:table-row-properties fo:keep-together="always"/>
    </style:style>
    <style:style style:name="Table1.30" style:family="table-row">
      <style:table-row-properties fo:keep-together="always"/>
    </style:style>
    <style:style style:name="Table1.32" style:family="table-row">
      <style:table-row-properties fo:keep-together="always"/>
    </style:style>
    <style:style style:name="Table1.34" style:family="table-row">
      <style:table-row-properties fo:keep-together="always"/>
    </style:style>
    <style:style style:name="Table1.36" style:family="table-row">
      <style:table-row-properties fo:keep-together="always"/>
    </style:style>
    <style:style style:name="Table1.38" style:family="table-row">
      <style:table-row-properties fo:keep-together="always"/>
    </style:style>
    <style:style style:name="Table1.40" style:family="table-row">
      <style:table-row-properties fo:keep-together="always"/>
    </style:style>
    <style:style style:name="Table1.42" style:family="table-row">
      <style:table-row-properties fo:keep-together="always"/>
    </style:style>
    <style:style style:name="Table1.44" style:family="table-row">
      <style:table-row-properties fo:keep-together="always"/>
    </style:style>
    <style:style style:name="Table1.46" style:family="table-row">
      <style:table-row-properties fo:keep-together="always"/>
    </style:style>
    <style:style style:name="Table1.48" style:family="table-row">
      <style:table-row-properties fo:keep-together="always"/>
    </style:style>
    <style:style style:name="Table1.50" style:family="table-row">
      <style:table-row-properties fo:keep-together="always"/>
    </style:style>
    <style:style style:name="Table1.52" style:family="table-row">
      <style:table-row-properties fo:keep-together="always"/>
    </style:style>
    <style:style style:name="Table1.54" style:family="table-row">
      <style:table-row-properties fo:keep-together="always"/>
    </style:style>
    <style:style style:name="Table1.56" style:family="table-row">
      <style:table-row-properties fo:keep-together="always"/>
    </style:style>
    <style:style style:name="Table1.58" style:family="table-row">
      <style:table-row-properties fo:keep-together="always"/>
    </style:style>
    <style:style style:name="Table1.60" style:family="table-row">
      <style:table-row-properties fo:keep-together="always"/>
    </style:style>
    <style:style style:name="Table1.62" style:family="table-row">
      <style:table-row-properties fo:keep-together="always"/>
    </style:style>
    <style:style style:name="Table1.64" style:family="table-row">
      <style:table-row-properties fo:keep-together="always"/>
    </style:style>
    <style:style style:name="Table1.66" style:family="table-row">
      <style:table-row-properties fo:keep-together="always"/>
    </style:style>
    <style:style style:name="Table1.68" style:family="table-row">
      <style:table-row-properties fo:keep-together="always"/>
    </style:style>
    <style:style style:name="Table1.70" style:family="table-row">
      <style:table-row-properties fo:keep-together="always"/>
    </style:style>
    <style:style style:name="Table1.72" style:family="table-row">
      <style:table-row-properties fo:keep-together="always"/>
    </style:style>
    <style:style style:name="Table1.74" style:family="table-row">
      <style:table-row-properties fo:keep-together="always"/>
    </style:style>
    <style:style style:name="Table1.76" style:family="table-row">
      <style:table-row-properties fo:keep-together="always"/>
    </style:style>
    <style:style style:name="Table1.78" style:family="table-row">
      <style:table-row-properties fo:keep-together="always"/>
    </style:style>
    <style:style style:name="Table1.80" style:family="table-row">
      <style:table-row-properties fo:keep-together="always"/>
    </style:style>
    <style:style style:name="Table1.82" style:family="table-row">
      <style:table-row-properties fo:keep-together="always"/>
    </style:style>
    <style:style style:name="Table1.84" style:family="table-row">
      <style:table-row-properties fo:keep-together="always"/>
    </style:style>
    <style:style style:name="Table1.86" style:family="table-row">
      <style:table-row-properties fo:keep-together="always"/>
    </style:style>
    <style:style style:name="Table1.88" style:family="table-row">
      <style:table-row-properties fo:keep-together="always"/>
    </style:style>
    <style:style style:name="Table1.90" style:family="table-row">
      <style:table-row-properties fo:keep-together="always"/>
    </style:style>
    <style:style style:name="Table1.92" style:family="table-row">
      <style:table-row-properties fo:keep-together="always"/>
    </style:style>
    <style:style style:name="Table1.94" style:family="table-row">
      <style:table-row-properties fo:keep-together="always"/>
    </style:style>
    <style:style style:name="Table1.96" style:family="table-row">
      <style:table-row-properties fo:keep-together="always"/>
    </style:style>
    <style:style style:name="Table1.98" style:family="table-row">
      <style:table-row-properties fo:keep-together="always"/>
    </style:style>
    <style:style style:name="Table1.100" style:family="table-row">
      <style:table-row-properties fo:keep-together="always"/>
    </style:style>
    <style:style style:name="Table1.102" style:family="table-row">
      <style:table-row-properties fo:keep-together="always"/>
    </style:style>
    <style:style style:name="Table1.104" style:family="table-row">
      <style:table-row-properties fo:keep-together="always"/>
    </style:style>
    <style:style style:name="Table1.106" style:family="table-row">
      <style:table-row-properties fo:keep-together="always"/>
    </style:style>
    <style:style style:name="Table1.108" style:family="table-row">
      <style:table-row-properties fo:keep-together="always"/>
    </style:style>
    <style:style style:name="Table1.110" style:family="table-row">
      <style:table-row-properties fo:keep-together="always"/>
    </style:style>
    <style:style style:name="Table1.112" style:family="table-row">
      <style:table-row-properties fo:keep-together="always"/>
    </style:style>
    <style:style style:name="Table1.114" style:family="table-row">
      <style:table-row-properties fo:keep-together="always"/>
    </style:style>
    <style:style style:name="Table1.116" style:family="table-row">
      <style:table-row-properties fo:keep-together="always"/>
    </style:style>
    <style:style style:name="Table1.118" style:family="table-row">
      <style:table-row-properties fo:keep-together="always"/>
    </style:style>
    <style:style style:name="P1" style:family="paragraph" style:parent-style-name="Table_20_Contents">
      <style:paragraph-properties fo:margin-left="0in" fo:margin-right="0in" fo:text-indent="0in" style:auto-text-indent="false"/>
    </style:style>
    <style:style style:name="P2" style:family="paragraph" style:parent-style-name="Table_20_Contents">
      <style:paragraph-properties fo:margin-left="0in" fo:margin-right="0in" fo:text-indent="0in" style:auto-text-indent="false"/>
      <style:text-properties officeooo:rsid="00160314" officeooo:paragraph-rsid="00160314"/>
    </style:style>
    <style:style style:name="P3" style:family="paragraph" style:parent-style-name="Table_20_Contents">
      <style:paragraph-properties fo:margin-left="0in" fo:margin-right="0in" fo:text-indent="0in" style:auto-text-indent="false"/>
      <style:text-properties officeooo:rsid="001761bc" officeooo:paragraph-rsid="001761bc"/>
    </style:style>
    <style:style style:name="P4" style:family="paragraph" style:parent-style-name="Table_20_Contents">
      <style:paragraph-properties fo:margin-left="0in" fo:margin-right="0in" fo:text-indent="0in" style:auto-text-indent="false"/>
      <style:text-properties officeooo:rsid="001777ed" officeooo:paragraph-rsid="001777ed"/>
    </style:style>
    <style:style style:name="P5" style:family="paragraph" style:parent-style-name="Table_20_Contents">
      <style:paragraph-properties fo:margin-left="0in" fo:margin-right="0in" fo:text-indent="0in" style:auto-text-indent="false"/>
      <style:text-properties officeooo:rsid="0018db24" officeooo:paragraph-rsid="0018db24"/>
    </style:style>
    <style:style style:name="P6" style:family="paragraph" style:parent-style-name="Table_20_Contents" style:list-style-name="L1">
      <style:text-properties officeooo:rsid="001a0c74" officeooo:paragraph-rsid="001a0c74"/>
    </style:style>
    <style:style style:name="P7" style:family="paragraph" style:parent-style-name="Table_20_Contents" style:list-style-name="L1">
      <style:text-properties officeooo:rsid="001b317e" officeooo:paragraph-rsid="001b317e"/>
    </style:style>
    <style:style style:name="P8" style:family="paragraph" style:parent-style-name="Table_20_Contents" style:list-style-name="L1">
      <style:text-properties officeooo:rsid="001cd419" officeooo:paragraph-rsid="001cd419"/>
    </style:style>
    <style:style style:name="P9" style:family="paragraph" style:parent-style-name="Table_20_Contents">
      <style:paragraph-properties fo:margin-left="0in" fo:margin-right="0in" fo:text-indent="0in" style:auto-text-indent="false"/>
      <style:text-properties officeooo:rsid="001da55f" officeooo:paragraph-rsid="001da55f"/>
    </style:style>
    <style:style style:name="P10" style:family="paragraph" style:parent-style-name="Table_20_Contents">
      <style:paragraph-properties fo:margin-left="0in" fo:margin-right="0in" fo:text-indent="0in" style:auto-text-indent="false"/>
      <style:text-properties officeooo:rsid="001e32d4" officeooo:paragraph-rsid="001e32d4"/>
    </style:style>
    <style:style style:name="P11" style:family="paragraph" style:parent-style-name="Table_20_Contents">
      <style:paragraph-properties fo:margin-left="0in" fo:margin-right="0in" fo:text-indent="0in" style:auto-text-indent="false"/>
      <style:text-properties officeooo:rsid="001e738a" officeooo:paragraph-rsid="001e738a"/>
    </style:style>
    <style:style style:name="P12" style:family="paragraph" style:parent-style-name="Table_20_Contents">
      <style:paragraph-properties fo:margin-left="0in" fo:margin-right="0in" fo:text-indent="0in" style:auto-text-indent="false"/>
      <style:text-properties officeooo:rsid="001f398b" officeooo:paragraph-rsid="001f398b"/>
    </style:style>
    <style:style style:name="P13" style:family="paragraph" style:parent-style-name="Table_20_Contents">
      <style:paragraph-properties fo:margin-left="0in" fo:margin-right="0in" fo:text-indent="0in" style:auto-text-indent="false"/>
      <style:text-properties officeooo:rsid="001f58aa" officeooo:paragraph-rsid="001f58aa"/>
    </style:style>
    <style:style style:name="P14" style:family="paragraph" style:parent-style-name="Table_20_Contents">
      <style:paragraph-properties fo:margin-left="0in" fo:margin-right="0in" fo:text-indent="0in" style:auto-text-indent="false"/>
      <style:text-properties officeooo:rsid="001f8233" officeooo:paragraph-rsid="001f8233"/>
    </style:style>
    <style:style style:name="T1" style:family="text">
      <style:text-properties fo:color="#000080" loext:opacity="100%"/>
    </style:style>
    <style:style style:name="T2" style:family="text">
      <style:text-properties fo:color="#336666" loext:opacity="100%"/>
    </style:style>
    <style:style style:name="T3" style:family="text">
      <style:text-properties fo:color="#ff0000" loext:opacity="100%"/>
    </style:style>
    <style:style style:name="T4" style:family="text">
      <style:text-properties fo:color="#ff0000" loext:opacity="100%" fo:font-weight="bold" fo:background-color="#bdffbd" loext:char-shading-value="0"/>
    </style:style>
    <style:style style:name="T5" style:family="text">
      <style:text-properties fo:font-style="italic"/>
    </style:style>
    <style:style style:name="T6" style:family="text">
      <style:text-properties officeooo:rsid="00164ff7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weight="bold" fo:background-color="#bdffbd" loext:char-shading-value="0"/>
    </style:style>
    <style:style style:name="T10" style:family="text">
      <style:text-properties fo:color="#a52a2a" loext:opacity="100%" style:text-position="33% 80%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able_20_Contents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Table_20_Contents"><text:a xlink:type="simple" xlink:href="bible://AVs/Mat%208:13" text:style-name="Internet_20_link" text:visited-style-name="Visited_20_Internet_20_Link"><text:span text:style-name="T1">Mat 8:13</text:span></text:a><text:span text:style-name="T2"> </text:span></text:p>
          </table:table-cell>
          <table:table-cell table:style-name="Table1.A1" office:value-type="string">
            <text:p text:style-name="P1">And Jesus said unto the centurion, <text:span text:style-name="T3">Go thy way; and as thou hast </text:span><text:span text:style-name="T4">believed</text:span><text:span text:style-name="T3">,</text:span> <text:span text:style-name="T5">so</text:span> <text:span text:style-name="T3">be it done unto thee.</text:span> And his servant was healed in the selfsame hour. </text:p>
          </table:table-cell>
          <table:table-cell table:style-name="Table1.C1" office:value-type="string">
            <text:p text:style-name="P2">The centurion believed <text:span text:style-name="T6">that if Jesus spoke the word only his servant would be healed.</text:span></text:p>
          </table:table-cell>
        </table:table-row>
        <table:table-row table:style-name="Table1.2">
          <table:table-cell table:style-name="Table1.A2" office:value-type="string">
            <text:p text:style-name="Table_20_Contents"><text:a xlink:type="simple" xlink:href="bible://AVs/Mat%209:28" text:style-name="Internet_20_link" text:visited-style-name="Visited_20_Internet_20_Link"><text:bookmark text:name="Mat"/><text:span text:style-name="T1">Mat 9:28</text:span></text:a><text:span text:style-name="T2"> </text:span></text:p>
          </table:table-cell>
          <table:table-cell table:style-name="Table1.A2" office:value-type="string">
            <text:p text:style-name="P1">And when he was come into the house, the blind men came to him: and Jesus saith unto them, <text:span text:style-name="T4">Believe</text:span><text:span text:style-name="T3"> ye that I am able to do this?</text:span> They said unto him, Yea, Lord. </text:p>
          </table:table-cell>
          <table:table-cell table:style-name="Table1.C2" office:value-type="string">
            <text:p text:style-name="P3">Jesus asked them if they believed he was able to make them able to see.</text:p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Mat%2018:6" text:style-name="Internet_20_link" text:visited-style-name="Visited_20_Internet_20_Link"><text:bookmark text:name="Mat Copy 1"/><text:span text:style-name="T1">Mat 18:6</text:span></text:a><text:span text:style-name="T2"> </text:span></text:p>
          </table:table-cell>
          <table:table-cell table:style-name="Table1.A2" office:value-type="string">
            <text:p text:style-name="P1"><text:span text:style-name="T3">But whoso shall offend one of these little ones which </text:span><text:span text:style-name="T4">believe</text:span><text:span text:style-name="T3"> in me, it were better for him that a millstone were hanged about his neck, and</text:span> <text:span text:style-name="T5">that</text:span> <text:span text:style-name="T3">he were drowned in the depth of the sea.</text:span> </text:p>
          </table:table-cell>
          <table:table-cell table:style-name="Table1.C2" office:value-type="string">
            <text:p text:style-name="P4">The little ones believed <text:span text:style-name="T7">in</text:span><text:span text:style-name="T8"> Jesus.</text:span></text:p>
          </table:table-cell>
        </table:table-row>
        <table:table-row table:style-name="Table1.4">
          <table:table-cell table:style-name="Table1.A2" office:value-type="string">
            <text:p text:style-name="Table_20_Contents"><text:a xlink:type="simple" xlink:href="bible://AVs/Mat%2021:25" text:style-name="Internet_20_link" text:visited-style-name="Visited_20_Internet_20_Link"><text:bookmark text:name="Mat Copy 2"/><text:span text:style-name="T1">Mat 21:25</text:span></text:a><text:span text:style-name="T2"> </text:span></text:p>
          </table:table-cell>
          <table:table-cell table:style-name="Table1.A2" office:value-type="string">
            <text:p text:style-name="P1"><text:span text:style-name="T3">The baptism of John, whence was it? from heaven, or of men?</text:span> And they reasoned with themselves, saying, If we shall say, From heaven; he will say unto us, Why did ye not then <text:span text:style-name="T9">believe</text:span> him? </text:p>
          </table:table-cell>
          <table:table-cell table:style-name="Table1.C2" office:value-type="string">
            <text:p text:style-name="P5">The chief priests and elders did not believe Jesus.</text:p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Mat%2021:32" text:style-name="Internet_20_link" text:visited-style-name="Visited_20_Internet_20_Link"><text:bookmark text:name="Mat Copy 3"/><text:span text:style-name="T1">Mat 21:32</text:span></text:a><text:span text:style-name="T2"> </text:span></text:p>
          </table:table-cell>
          <table:table-cell table:style-name="Table1.A2" office:value-type="string">
            <text:p text:style-name="P1"><text:span text:style-name="T3">For John came unto you in the way of righteousness, and ye </text:span><text:span text:style-name="T4">believed</text:span><text:span text:style-name="T3"> him not: but the publicans and the harlots </text:span><text:span text:style-name="T4">believed</text:span><text:span text:style-name="T3"> him: and ye, when ye had seen</text:span> <text:span text:style-name="T5">it</text:span>, <text:span text:style-name="T3">repented not afterward, that ye might </text:span><text:span text:style-name="T4">believe</text:span><text:span text:style-name="T3"> him.</text:span> </text:p>
          </table:table-cell>
          <table:table-cell table:style-name="Table1.C2" office:value-type="string">
            <text:list text:style-name="L1">
              <text:list-item>
                <text:p text:style-name="P6">The chief priests and elders did not believe John.</text:p>
              </text:list-item>
              <text:list-item>
                <text:p text:style-name="P7">The publicans and harlots did believe John.</text:p>
              </text:list-item>
              <text:list-item>
                <text:p text:style-name="P8">The chief priests and elders when they saw others believe, did not repent that they might believe John.</text:p>
              </text:list-item>
            </text:list>
          </table:table-cell>
        </table:table-row>
        <table:table-row table:style-name="Table1.6">
          <table:table-cell table:style-name="Table1.A2" office:value-type="string">
            <text:p text:style-name="Table_20_Contents"><text:a xlink:type="simple" xlink:href="bible://AVs/Mat%2024:23" text:style-name="Internet_20_link" text:visited-style-name="Visited_20_Internet_20_Link"><text:bookmark text:name="Mat Copy 4"/><text:span text:style-name="T1">Mat 24:23</text:span></text:a><text:span text:style-name="T2"> </text:span></text:p>
          </table:table-cell>
          <table:table-cell table:style-name="Table1.A2" office:value-type="string">
            <text:p text:style-name="P1"><text:span text:style-name="T3">Then if any man shall say unto you, Lo, here</text:span> <text:span text:style-name="T5">is</text:span> <text:span text:style-name="T3">Christ, or there; </text:span><text:span text:style-name="T4">believe</text:span> <text:span text:style-name="T5">it</text:span> <text:span text:style-name="T3">not.</text:span> </text:p>
          </table:table-cell>
          <table:table-cell table:style-name="Table1.C2" office:value-type="string">
            <text:p text:style-name="P9">Jesus warns us to not believe false Christs or false prophets.</text:p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Mat%2024:26" text:style-name="Internet_20_link" text:visited-style-name="Visited_20_Internet_20_Link"><text:bookmark text:name="Mat Copy 5"/><text:span text:style-name="T1">Mat 24:26</text:span></text:a><text:span text:style-name="T2"> </text:span></text:p>
          </table:table-cell>
          <table:table-cell table:style-name="Table1.A2" office:value-type="string">
            <text:p text:style-name="P1"><text:span text:style-name="T3">Wherefore if they shall say unto you, Behold, he is in the desert; go not forth: behold,</text:span> <text:span text:style-name="T5">he is</text:span> <text:span text:style-name="T3">in the secret chambers; </text:span><text:span text:style-name="T4">believe</text:span> <text:span text:style-name="T5">it</text:span> <text:span text:style-name="T3">not.</text:span> </text:p>
          </table:table-cell>
          <table:table-cell table:style-name="Table1.C2" office:value-type="string">
            <text:p text:style-name="P10">Jesus warns us to not believe lies about His return.</text:p>
          </table:table-cell>
        </table:table-row>
        <table:table-row table:style-name="Table1.8">
          <table:table-cell table:style-name="Table1.A2" office:value-type="string">
            <text:p text:style-name="Table_20_Contents"><text:a xlink:type="simple" xlink:href="bible://AVs/Mat%2027:42" text:style-name="Internet_20_link" text:visited-style-name="Visited_20_Internet_20_Link"><text:bookmark text:name="Mat Copy 6"/><text:span text:style-name="T1">Mat 27:42</text:span></text:a><text:span text:style-name="T2"> </text:span></text:p>
          </table:table-cell>
          <table:table-cell table:style-name="Table1.A2" office:value-type="string">
            <text:p text:style-name="P1">He saved others; himself he cannot save. If he be the King of Israel, let him now come down from the cross, and we will <text:span text:style-name="T9">believe</text:span> him. </text:p>
          </table:table-cell>
          <table:table-cell table:style-name="Table1.C2" office:value-type="string">
            <text:p text:style-name="P11">The chief priests, scribes, and elders mocked Jesus (lying) that if he came down from the cross they would believe him.</text:p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Mar%201:15" text:style-name="Internet_20_link" text:visited-style-name="Visited_20_Internet_20_Link"><text:bookmark text:name="Mar"/><text:span text:style-name="T1">Mar 1:15</text:span></text:a><text:span text:style-name="T2"> </text:span></text:p>
          </table:table-cell>
          <table:table-cell table:style-name="Table1.A2" office:value-type="string">
            <text:p text:style-name="P1">And saying, <text:span text:style-name="T3">The time is fulfilled, and the kingdom of God is at hand: repent ye, and </text:span><text:span text:style-name="T4">believe</text:span><text:span text:style-name="T3"> the gospel.</text:span> </text:p>
          </table:table-cell>
          <table:table-cell table:style-name="Table1.C2" office:value-type="string">
            <text:p text:style-name="P12">Everyone is commanded to believe the gospel.</text:p>
          </table:table-cell>
        </table:table-row>
        <table:table-row table:style-name="Table1.10">
          <table:table-cell table:style-name="Table1.A2" office:value-type="string">
            <text:p text:style-name="Table_20_Contents"><text:a xlink:type="simple" xlink:href="bible://AVs/Mar%205:36" text:style-name="Internet_20_link" text:visited-style-name="Visited_20_Internet_20_Link"><text:bookmark text:name="Mar Copy 1"/><text:span text:style-name="T1">Mar 5:36</text:span></text:a><text:span text:style-name="T2"> </text:span></text:p>
          </table:table-cell>
          <table:table-cell table:style-name="Table1.A2" office:value-type="string">
            <text:p text:style-name="P1">As soon as Jesus heard the word that was spoken, he saith unto the ruler of the synagogue, <text:span text:style-name="T3">Be not afraid, only </text:span><text:span text:style-name="T4">believe</text:span><text:span text:style-name="T3">.</text:span> </text:p>
          </table:table-cell>
          <table:table-cell table:style-name="Table1.C2" office:value-type="string">
            <text:p text:style-name="P13">Jesus tells Jairus to not be afraid and only believe.</text:p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Mar%209:23" text:style-name="Internet_20_link" text:visited-style-name="Visited_20_Internet_20_Link"><text:bookmark text:name="Mar Copy 2"/><text:span text:style-name="T1">Mar 9:23</text:span></text:a><text:span text:style-name="T2"> </text:span></text:p>
          </table:table-cell>
          <table:table-cell table:style-name="Table1.A2" office:value-type="string">
            <text:p text:style-name="P1">Jesus said unto him, <text:span text:style-name="T3">If thou canst </text:span><text:span text:style-name="T4">believe</text:span><text:span text:style-name="T3">, all things</text:span> <text:span text:style-name="T5">are</text:span> <text:span text:style-name="T3">possible to him that </text:span><text:span text:style-name="T4">believeth</text:span><text:span text:style-name="T3">.</text:span> </text:p>
          </table:table-cell>
          <table:table-cell table:style-name="Table1.C2" office:value-type="string">
            <text:p text:style-name="P14">All things are possible if you believe.</text:p>
          </table:table-cell>
        </table:table-row>
        <table:table-row table:style-name="Table1.12">
          <table:table-cell table:style-name="Table1.A2" office:value-type="string">
            <text:p text:style-name="Table_20_Contents"><text:a xlink:type="simple" xlink:href="bible://AVs/Mar%209:24" text:style-name="Internet_20_link" text:visited-style-name="Visited_20_Internet_20_Link"><text:bookmark text:name="Mar Copy 3"/><text:span text:style-name="T1">Mar 9:24</text:span></text:a><text:span text:style-name="T2"> </text:span></text:p>
          </table:table-cell>
          <table:table-cell table:style-name="Table1.A2" office:value-type="string">
            <text:p text:style-name="P1">And straightway the father of the child cried out, and said with tears, Lord, I <text:span text:style-name="T9">believe</text:span>; help thou mine unbelief. </text:p>
          </table:table-cell>
          <table:table-cell table:style-name="Table1.C2" office:value-type="string">
            <text:p text:style-name="P1"/>
          </table:table-cell>
        </table:table-row>
        <text:soft-page-break/>
        <table:table-row table:style-name="Table1.1">
          <table:table-cell table:style-name="Table1.A2" office:value-type="string">
            <text:p text:style-name="Table_20_Contents"><text:a xlink:type="simple" xlink:href="bible://AVs/Mar%209:42" text:style-name="Internet_20_link" text:visited-style-name="Visited_20_Internet_20_Link"><text:bookmark text:name="Mar Copy 4"/><text:span text:style-name="T1">Mar 9:42</text:span></text:a><text:span text:style-name="T2"> </text:span></text:p>
          </table:table-cell>
          <table:table-cell table:style-name="Table1.A2" office:value-type="string">
            <text:p text:style-name="P1"><text:span text:style-name="T3">And whosoever shall offend one of</text:span> <text:span text:style-name="T5">these</text:span> <text:span text:style-name="T3">little ones that </text:span><text:span text:style-name="T4">believe</text:span><text:span text:style-name="T3"> in me, it is better for him that a millstone were hanged about his neck, and he were cast into the sea.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14">
          <table:table-cell table:style-name="Table1.A2" office:value-type="string">
            <text:p text:style-name="Table_20_Contents"><text:a xlink:type="simple" xlink:href="bible://AVs/Mar%2011:23" text:style-name="Internet_20_link" text:visited-style-name="Visited_20_Internet_20_Link"><text:bookmark text:name="Mar Copy 5"/><text:span text:style-name="T1">Mar 11:23</text:span></text:a><text:span text:style-name="T2"> </text:span></text:p>
          </table:table-cell>
          <table:table-cell table:style-name="Table1.A2" office:value-type="string">
            <text:p text:style-name="P1"><text:span text:style-name="T3">For verily I say unto you, That whosoever shall say unto this mountain, Be thou removed, and be thou cast into the sea; and shall not doubt in his heart, but shall </text:span><text:span text:style-name="T4">believe</text:span><text:span text:style-name="T3"> that those things which he saith shall come to pass; he shall have whatsoever he saith.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Mar%2011:24" text:style-name="Internet_20_link" text:visited-style-name="Visited_20_Internet_20_Link"><text:bookmark text:name="Mar Copy 6"/><text:span text:style-name="T1">Mar 11:24</text:span></text:a><text:span text:style-name="T2"> </text:span></text:p>
          </table:table-cell>
          <table:table-cell table:style-name="Table1.A2" office:value-type="string">
            <text:p text:style-name="P1"><text:span text:style-name="T3">Therefore I say unto you, What things soever ye desire, when ye pray, </text:span><text:span text:style-name="T4">believe</text:span><text:span text:style-name="T3"> that ye receive</text:span> <text:span text:style-name="T5">them</text:span>, <text:span text:style-name="T3">and ye shall have</text:span> <text:span text:style-name="T5">them</text:span>. </text:p>
          </table:table-cell>
          <table:table-cell table:style-name="Table1.C2" office:value-type="string">
            <text:p text:style-name="P1"/>
          </table:table-cell>
        </table:table-row>
        <table:table-row table:style-name="Table1.16">
          <table:table-cell table:style-name="Table1.A2" office:value-type="string">
            <text:p text:style-name="Table_20_Contents"><text:a xlink:type="simple" xlink:href="bible://AVs/Mar%2011:31" text:style-name="Internet_20_link" text:visited-style-name="Visited_20_Internet_20_Link"><text:bookmark text:name="Mar Copy 7"/><text:span text:style-name="T1">Mar 11:31</text:span></text:a><text:span text:style-name="T2"> </text:span></text:p>
          </table:table-cell>
          <table:table-cell table:style-name="Table1.A2" office:value-type="string">
            <text:p text:style-name="P1">And they reasoned with themselves, saying, If we shall say, From heaven; he will say, Why then did ye not <text:span text:style-name="T9">believe</text:span> him?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Mar%2013:21" text:style-name="Internet_20_link" text:visited-style-name="Visited_20_Internet_20_Link"><text:bookmark text:name="Mar Copy 8"/><text:span text:style-name="T1">Mar 13:21</text:span></text:a><text:span text:style-name="T2"> </text:span></text:p>
          </table:table-cell>
          <table:table-cell table:style-name="Table1.A2" office:value-type="string">
            <text:p text:style-name="P1"><text:span text:style-name="T3">And then if any man shall say to you, Lo, here</text:span> <text:span text:style-name="T5">is</text:span> <text:span text:style-name="T3">Christ; or, lo,</text:span> <text:span text:style-name="T5">he is</text:span> <text:span text:style-name="T3">there; </text:span><text:span text:style-name="T4">believe</text:span> <text:span text:style-name="T5">him</text:span> <text:span text:style-name="T3">not: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18">
          <table:table-cell table:style-name="Table1.A2" office:value-type="string">
            <text:p text:style-name="Table_20_Contents"><text:a xlink:type="simple" xlink:href="bible://AVs/Mar%2015:32" text:style-name="Internet_20_link" text:visited-style-name="Visited_20_Internet_20_Link"><text:bookmark text:name="Mar Copy 9"/><text:span text:style-name="T1">Mar 15:32</text:span></text:a><text:span text:style-name="T2"> </text:span></text:p>
          </table:table-cell>
          <table:table-cell table:style-name="Table1.A2" office:value-type="string">
            <text:p text:style-name="P1">Let Christ the King of Israel descend now from the cross, that we may see and <text:span text:style-name="T9">believe</text:span>. And they that were crucified with him reviled him.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Mar%2016:11" text:style-name="Internet_20_link" text:visited-style-name="Visited_20_Internet_20_Link"><text:bookmark text:name="Mar Copy 10"/><text:span text:style-name="T1">Mar 16:11</text:span></text:a><text:span text:style-name="T2"> </text:span></text:p>
          </table:table-cell>
          <table:table-cell table:style-name="Table1.A2" office:value-type="string">
            <text:p text:style-name="P1">And they, when they had heard that he was alive, and had been seen of her, <text:span text:style-name="T9">believed</text:span> not. </text:p>
          </table:table-cell>
          <table:table-cell table:style-name="Table1.C2" office:value-type="string">
            <text:p text:style-name="P1"/>
          </table:table-cell>
        </table:table-row>
        <table:table-row table:style-name="Table1.20">
          <table:table-cell table:style-name="Table1.A2" office:value-type="string">
            <text:p text:style-name="Table_20_Contents"><text:a xlink:type="simple" xlink:href="bible://AVs/Mar%2016:13" text:style-name="Internet_20_link" text:visited-style-name="Visited_20_Internet_20_Link"><text:bookmark text:name="Mar Copy 11"/><text:span text:style-name="T1">Mar 16:13</text:span></text:a><text:span text:style-name="T2"> </text:span></text:p>
          </table:table-cell>
          <table:table-cell table:style-name="Table1.A2" office:value-type="string">
            <text:p text:style-name="P1">And they went and told <text:span text:style-name="T5">it</text:span> unto the residue: neither <text:span text:style-name="T9">believed</text:span> they them.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Mar%2016:14" text:style-name="Internet_20_link" text:visited-style-name="Visited_20_Internet_20_Link"><text:bookmark text:name="Mar Copy 12"/><text:span text:style-name="T1">Mar 16:14</text:span></text:a><text:span text:style-name="T2"> </text:span></text:p>
          </table:table-cell>
          <table:table-cell table:style-name="Table1.A2" office:value-type="string">
            <text:p text:style-name="P1">¶ Afterward he appeared unto the eleven as they sat at<text:a xlink:type="simple" xlink:href="../../../Apps/Bible%20Analyzer%205.6%20Portable/bibleFN/AVs/Mar%2016:14://1" text:style-name="Internet_20_link" text:visited-style-name="Visited_20_Internet_20_Link"><text:span text:style-name="T10">1</text:span></text:a> meat, and upbraided them with their unbelief and hardness of heart, because they <text:span text:style-name="T9">believed</text:span> not them which had seen him after he was risen. </text:p>
          </table:table-cell>
          <table:table-cell table:style-name="Table1.C2" office:value-type="string">
            <text:p text:style-name="P1"/>
          </table:table-cell>
        </table:table-row>
        <table:table-row table:style-name="Table1.22">
          <table:table-cell table:style-name="Table1.A2" office:value-type="string">
            <text:p text:style-name="Table_20_Contents"><text:a xlink:type="simple" xlink:href="bible://AVs/Mar%2016:16" text:style-name="Internet_20_link" text:visited-style-name="Visited_20_Internet_20_Link"><text:bookmark text:name="Mar Copy 13"/><text:span text:style-name="T1">Mar 16:16</text:span></text:a><text:span text:style-name="T2"> </text:span></text:p>
          </table:table-cell>
          <table:table-cell table:style-name="Table1.A2" office:value-type="string">
            <text:p text:style-name="P1"><text:span text:style-name="T3">He that </text:span><text:span text:style-name="T4">believeth</text:span><text:span text:style-name="T3"> and is baptized shall be saved; but he that </text:span><text:span text:style-name="T4">believeth</text:span><text:span text:style-name="T3"> not shall be damned.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Mar%2016:17" text:style-name="Internet_20_link" text:visited-style-name="Visited_20_Internet_20_Link"><text:bookmark text:name="Mar Copy 14"/><text:span text:style-name="T1">Mar 16:17</text:span></text:a><text:span text:style-name="T2"> </text:span></text:p>
          </table:table-cell>
          <table:table-cell table:style-name="Table1.A2" office:value-type="string">
            <text:p text:style-name="P1"><text:span text:style-name="T3">And these signs shall follow them that </text:span><text:span text:style-name="T4">believe</text:span><text:span text:style-name="T3">; In my name shall they cast out devils; they shall speak with new tongues;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24">
          <table:table-cell table:style-name="Table1.A2" office:value-type="string">
            <text:p text:style-name="Table_20_Contents"><text:a xlink:type="simple" xlink:href="bible://AVs/Luk%201:1" text:style-name="Internet_20_link" text:visited-style-name="Visited_20_Internet_20_Link"><text:bookmark text:name="Luk"/><text:span text:style-name="T1">Luk 1:1</text:span></text:a><text:span text:style-name="T2"> </text:span></text:p>
          </table:table-cell>
          <table:table-cell table:style-name="Table1.A2" office:value-type="string">
            <text:p text:style-name="P1">¶ Forasmuch as many have taken in hand to set forth in order a declaration of those things which are most surely <text:span text:style-name="T9">believed</text:span> among us,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Luk%201:20" text:style-name="Internet_20_link" text:visited-style-name="Visited_20_Internet_20_Link"><text:bookmark text:name="Luk Copy 1"/><text:span text:style-name="T1">Luk 1:20</text:span></text:a><text:span text:style-name="T2"> </text:span></text:p>
          </table:table-cell>
          <table:table-cell table:style-name="Table1.A2" office:value-type="string">
            <text:p text:style-name="P1">And, behold, thou shalt be dumb, and not able to speak, until the day that these things shall be performed, because thou <text:span text:style-name="T9">believest</text:span> not my words, which shall be fulfilled in their season. </text:p>
          </table:table-cell>
          <table:table-cell table:style-name="Table1.C2" office:value-type="string">
            <text:p text:style-name="P1"/>
          </table:table-cell>
        </table:table-row>
        <table:table-row table:style-name="Table1.26">
          <table:table-cell table:style-name="Table1.A2" office:value-type="string">
            <text:p text:style-name="Table_20_Contents"><text:a xlink:type="simple" xlink:href="bible://AVs/Luk%201:45" text:style-name="Internet_20_link" text:visited-style-name="Visited_20_Internet_20_Link"><text:bookmark text:name="Luk Copy 2"/><text:span text:style-name="T1">Luk 1:45</text:span></text:a><text:span text:style-name="T2"> </text:span></text:p>
          </table:table-cell>
          <table:table-cell table:style-name="Table1.A2" office:value-type="string">
            <text:p text:style-name="P1">And blessed <text:span text:style-name="T5">is</text:span> she that<text:a xlink:type="simple" xlink:href="../../../Apps/Bible%20Analyzer%205.6%20Portable/bibleFN/AVs/Luk%201:45://3" text:style-name="Internet_20_link" text:visited-style-name="Visited_20_Internet_20_Link"><text:span text:style-name="T10">3</text:span></text:a> <text:span text:style-name="T9">believed</text:span>: for there shall be a performance of those things which were told her from the Lord.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Luk%208:12" text:style-name="Internet_20_link" text:visited-style-name="Visited_20_Internet_20_Link"><text:bookmark text:name="Luk Copy 3"/><text:span text:style-name="T1">Luk 8:12</text:span></text:a><text:span text:style-name="T2"> </text:span></text:p>
          </table:table-cell>
          <table:table-cell table:style-name="Table1.A2" office:value-type="string">
            <text:p text:style-name="P1"><text:span text:style-name="T3">Those by the way side are they that hear; then cometh the devil, and taketh away the word out of their hearts, lest they should </text:span><text:span text:style-name="T4">believe</text:span><text:span text:style-name="T3"> and be saved.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28">
          <table:table-cell table:style-name="Table1.A2" office:value-type="string">
            <text:p text:style-name="Table_20_Contents"><text:a xlink:type="simple" xlink:href="bible://AVs/Luk%208:13" text:style-name="Internet_20_link" text:visited-style-name="Visited_20_Internet_20_Link"><text:bookmark text:name="Luk Copy 4"/><text:span text:style-name="T1">Luk 8:13</text:span></text:a><text:span text:style-name="T2"> </text:span></text:p>
          </table:table-cell>
          <table:table-cell table:style-name="Table1.A2" office:value-type="string">
            <text:p text:style-name="P1"><text:span text:style-name="T3">They on the rock</text:span> <text:span text:style-name="T5">are they</text:span>, <text:span text:style-name="T3">which, when they hear, receive the word with joy; and these have no root, which for a while </text:span><text:span text:style-name="T4">believe</text:span><text:span text:style-name="T3">, and in time of temptation fall away.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Luk%208:50" text:style-name="Internet_20_link" text:visited-style-name="Visited_20_Internet_20_Link"><text:bookmark text:name="Luk Copy 5"/><text:span text:style-name="T1">Luk 8:50</text:span></text:a><text:span text:style-name="T2"> </text:span></text:p>
          </table:table-cell>
          <table:table-cell table:style-name="Table1.A2" office:value-type="string">
            <text:p text:style-name="P1">But when Jesus heard <text:span text:style-name="T5">it</text:span>, he answered him, saying, <text:span text:style-name="T3">Fear not: </text:span><text:span text:style-name="T4">believe</text:span><text:span text:style-name="T3"> only, and she shall be made whole.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30">
          <table:table-cell table:style-name="Table1.A2" office:value-type="string">
            <text:p text:style-name="Table_20_Contents"><text:a xlink:type="simple" xlink:href="bible://AVs/Luk%2020:5" text:style-name="Internet_20_link" text:visited-style-name="Visited_20_Internet_20_Link"><text:bookmark text:name="Luk Copy 6"/><text:span text:style-name="T1">Luk 20:5</text:span></text:a><text:span text:style-name="T2"> </text:span></text:p>
          </table:table-cell>
          <table:table-cell table:style-name="Table1.A2" office:value-type="string">
            <text:p text:style-name="P1">And they reasoned with themselves, saying, If we shall say, From heaven; he will say, Why then <text:span text:style-name="T9">believed</text:span> ye him not? </text:p>
          </table:table-cell>
          <table:table-cell table:style-name="Table1.C2" office:value-type="string">
            <text:p text:style-name="P1"/>
          </table:table-cell>
        </table:table-row>
        <text:soft-page-break/>
        <table:table-row table:style-name="Table1.1">
          <table:table-cell table:style-name="Table1.A2" office:value-type="string">
            <text:p text:style-name="Table_20_Contents"><text:a xlink:type="simple" xlink:href="bible://AVs/Luk%2022:67" text:style-name="Internet_20_link" text:visited-style-name="Visited_20_Internet_20_Link"><text:bookmark text:name="Luk Copy 7"/><text:span text:style-name="T1">Luk 22:67</text:span></text:a><text:span text:style-name="T2"> </text:span></text:p>
          </table:table-cell>
          <table:table-cell table:style-name="Table1.A2" office:value-type="string">
            <text:p text:style-name="P1">Art thou the Christ? tell us. And he said unto them, <text:span text:style-name="T3">If I tell you, ye will not </text:span><text:span text:style-name="T4">believe</text:span><text:span text:style-name="T3">: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32">
          <table:table-cell table:style-name="Table1.A2" office:value-type="string">
            <text:p text:style-name="Table_20_Contents"><text:a xlink:type="simple" xlink:href="bible://AVs/Luk%2024:11" text:style-name="Internet_20_link" text:visited-style-name="Visited_20_Internet_20_Link"><text:bookmark text:name="Luk Copy 8"/><text:span text:style-name="T1">Luk 24:11</text:span></text:a><text:span text:style-name="T2"> </text:span></text:p>
          </table:table-cell>
          <table:table-cell table:style-name="Table1.A2" office:value-type="string">
            <text:p text:style-name="P1">And their words seemed to them as idle tales, and they <text:span text:style-name="T9">believed</text:span> them not.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Luk%2024:25" text:style-name="Internet_20_link" text:visited-style-name="Visited_20_Internet_20_Link"><text:bookmark text:name="Luk Copy 9"/><text:span text:style-name="T1">Luk 24:25</text:span></text:a><text:span text:style-name="T2"> </text:span></text:p>
          </table:table-cell>
          <table:table-cell table:style-name="Table1.A2" office:value-type="string">
            <text:p text:style-name="P1">Then he said unto them, <text:span text:style-name="T3">O fools, and slow of heart to </text:span><text:span text:style-name="T4">believe</text:span><text:span text:style-name="T3"> all that the prophets have spoken: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34">
          <table:table-cell table:style-name="Table1.A2" office:value-type="string">
            <text:p text:style-name="Table_20_Contents"><text:a xlink:type="simple" xlink:href="bible://AVs/Luk%2024:41" text:style-name="Internet_20_link" text:visited-style-name="Visited_20_Internet_20_Link"><text:bookmark text:name="Luk Copy 10"/><text:span text:style-name="T1">Luk 24:41</text:span></text:a><text:span text:style-name="T2"> </text:span></text:p>
          </table:table-cell>
          <table:table-cell table:style-name="Table1.A2" office:value-type="string">
            <text:p text:style-name="P1">And while they yet <text:span text:style-name="T9">believed</text:span> not for joy, and wondered, he said unto them, <text:span text:style-name="T3">Have ye here any meat?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Joh%201:7" text:style-name="Internet_20_link" text:visited-style-name="Visited_20_Internet_20_Link"><text:bookmark text:name="Joh"/><text:span text:style-name="T1">Joh 1:7</text:span></text:a><text:span text:style-name="T2"> </text:span></text:p>
          </table:table-cell>
          <table:table-cell table:style-name="Table1.A2" office:value-type="string">
            <text:p text:style-name="P1">The same came for a witness, to bear witness of the Light, that all <text:span text:style-name="T5">men</text:span> through him might <text:span text:style-name="T9">believe</text:span>. </text:p>
          </table:table-cell>
          <table:table-cell table:style-name="Table1.C2" office:value-type="string">
            <text:p text:style-name="P1"/>
          </table:table-cell>
        </table:table-row>
        <table:table-row table:style-name="Table1.36">
          <table:table-cell table:style-name="Table1.A2" office:value-type="string">
            <text:p text:style-name="Table_20_Contents"><text:a xlink:type="simple" xlink:href="bible://AVs/Joh%201:12" text:style-name="Internet_20_link" text:visited-style-name="Visited_20_Internet_20_Link"><text:bookmark text:name="Joh Copy 1"/><text:span text:style-name="T1">Joh 1:12</text:span></text:a><text:span text:style-name="T2"> </text:span></text:p>
          </table:table-cell>
          <table:table-cell table:style-name="Table1.A2" office:value-type="string">
            <text:p text:style-name="P1">But as many as received him, to them gave he power<text:a xlink:type="simple" xlink:href="../../../Apps/Bible%20Analyzer%205.6%20Portable/bibleFN/AVs/Joh%201:12://1" text:style-name="Internet_20_link" text:visited-style-name="Visited_20_Internet_20_Link"><text:span text:style-name="T10">1</text:span></text:a> to become the sons of God, <text:span text:style-name="T5">even</text:span> to them that <text:span text:style-name="T9">believe</text:span> on his name: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Joh%201:50" text:style-name="Internet_20_link" text:visited-style-name="Visited_20_Internet_20_Link"><text:bookmark text:name="Joh Copy 2"/><text:span text:style-name="T1">Joh 1:50</text:span></text:a><text:span text:style-name="T2"> </text:span></text:p>
          </table:table-cell>
          <table:table-cell table:style-name="Table1.A2" office:value-type="string">
            <text:p text:style-name="P1">Jesus answered and said unto him, <text:span text:style-name="T3">Because I said unto thee, I saw thee under the fig tree, </text:span><text:span text:style-name="T4">believest</text:span><text:span text:style-name="T3"> thou? thou shalt see greater things than these.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38">
          <table:table-cell table:style-name="Table1.A2" office:value-type="string">
            <text:p text:style-name="Table_20_Contents"><text:a xlink:type="simple" xlink:href="bible://AVs/Joh%202:11" text:style-name="Internet_20_link" text:visited-style-name="Visited_20_Internet_20_Link"><text:bookmark text:name="Joh Copy 3"/><text:span text:style-name="T1">Joh 2:11</text:span></text:a><text:span text:style-name="T2"> </text:span></text:p>
          </table:table-cell>
          <table:table-cell table:style-name="Table1.A2" office:value-type="string">
            <text:p text:style-name="P1">This beginning of miracles did Jesus in Cana of Galilee, and manifested forth his glory; and his disciples <text:span text:style-name="T9">believed</text:span> on him.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Joh%202:22" text:style-name="Internet_20_link" text:visited-style-name="Visited_20_Internet_20_Link"><text:bookmark text:name="Joh Copy 4"/><text:span text:style-name="T1">Joh 2:22</text:span></text:a><text:span text:style-name="T2"> </text:span></text:p>
          </table:table-cell>
          <table:table-cell table:style-name="Table1.A2" office:value-type="string">
            <text:p text:style-name="P1">When therefore he was risen from the dead, his disciples remembered that he had said this unto them; and they <text:span text:style-name="T9">believed</text:span> the scripture, and the word which Jesus had said. </text:p>
          </table:table-cell>
          <table:table-cell table:style-name="Table1.C2" office:value-type="string">
            <text:p text:style-name="P1"/>
          </table:table-cell>
        </table:table-row>
        <table:table-row table:style-name="Table1.40">
          <table:table-cell table:style-name="Table1.A2" office:value-type="string">
            <text:p text:style-name="Table_20_Contents"><text:a xlink:type="simple" xlink:href="bible://AVs/Joh%202:23" text:style-name="Internet_20_link" text:visited-style-name="Visited_20_Internet_20_Link"><text:bookmark text:name="Joh Copy 5"/><text:span text:style-name="T1">Joh 2:23</text:span></text:a><text:span text:style-name="T2"> </text:span></text:p>
          </table:table-cell>
          <table:table-cell table:style-name="Table1.A2" office:value-type="string">
            <text:p text:style-name="P1">¶ Now when he was in Jerusalem at the passover, in the feast <text:span text:style-name="T5">day</text:span>, many <text:span text:style-name="T9">believed</text:span> in his name, when they saw the miracles which he did.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Joh%203:12" text:style-name="Internet_20_link" text:visited-style-name="Visited_20_Internet_20_Link"><text:bookmark text:name="Joh Copy 6"/><text:span text:style-name="T1">Joh 3:12</text:span></text:a><text:span text:style-name="T2"> </text:span></text:p>
          </table:table-cell>
          <table:table-cell table:style-name="Table1.A2" office:value-type="string">
            <text:p text:style-name="P1"><text:span text:style-name="T3">If I have told you earthly things, and ye </text:span><text:span text:style-name="T4">believe</text:span><text:span text:style-name="T3"> not, how shall ye </text:span><text:span text:style-name="T4">believe</text:span><text:span text:style-name="T3">, if I tell you</text:span> <text:span text:style-name="T5">of</text:span> <text:span text:style-name="T3">heavenly things?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42">
          <table:table-cell table:style-name="Table1.A2" office:value-type="string">
            <text:p text:style-name="Table_20_Contents"><text:a xlink:type="simple" xlink:href="bible://AVs/Joh%203:15" text:style-name="Internet_20_link" text:visited-style-name="Visited_20_Internet_20_Link"><text:bookmark text:name="Joh Copy 7"/><text:span text:style-name="T1">Joh 3:15</text:span></text:a><text:span text:style-name="T2"> </text:span></text:p>
          </table:table-cell>
          <table:table-cell table:style-name="Table1.A2" office:value-type="string">
            <text:p text:style-name="P1"><text:span text:style-name="T3">That whosoever </text:span><text:span text:style-name="T4">believeth</text:span><text:span text:style-name="T3"> in him should not perish, but have eternal life.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Joh%203:16" text:style-name="Internet_20_link" text:visited-style-name="Visited_20_Internet_20_Link"><text:bookmark text:name="Joh Copy 8"/><text:span text:style-name="T1">Joh 3:16</text:span></text:a><text:span text:style-name="T2"> </text:span></text:p>
          </table:table-cell>
          <table:table-cell table:style-name="Table1.A2" office:value-type="string">
            <text:p text:style-name="P1">¶ <text:span text:style-name="T3">For God so loved the world, that he gave his only begotten Son, that whosoever </text:span><text:span text:style-name="T4">believeth</text:span><text:span text:style-name="T3"> in him should not perish, but have everlasting life.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44">
          <table:table-cell table:style-name="Table1.A2" office:value-type="string">
            <text:p text:style-name="Table_20_Contents"><text:a xlink:type="simple" xlink:href="bible://AVs/Joh%203:18" text:style-name="Internet_20_link" text:visited-style-name="Visited_20_Internet_20_Link"><text:bookmark text:name="Joh Copy 9"/><text:span text:style-name="T1">Joh 3:18</text:span></text:a><text:span text:style-name="T2"> </text:span></text:p>
          </table:table-cell>
          <table:table-cell table:style-name="Table1.A2" office:value-type="string">
            <text:p text:style-name="P1">¶ <text:span text:style-name="T3">He that </text:span><text:span text:style-name="T4">believeth</text:span><text:span text:style-name="T3"> on him is not condemned: but he that </text:span><text:span text:style-name="T4">believeth</text:span><text:span text:style-name="T3"> not is condemned already, because he hath not </text:span><text:span text:style-name="T4">believed</text:span><text:span text:style-name="T3"> in the name of the only begotten Son of God.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Joh%203:36" text:style-name="Internet_20_link" text:visited-style-name="Visited_20_Internet_20_Link"><text:bookmark text:name="Joh Copy 10"/><text:span text:style-name="T1">Joh 3:36</text:span></text:a><text:span text:style-name="T2"> </text:span></text:p>
          </table:table-cell>
          <table:table-cell table:style-name="Table1.A2" office:value-type="string">
            <text:p text:style-name="P1">He that <text:span text:style-name="T9">believeth</text:span> on the Son hath everlasting life: and he that <text:span text:style-name="T9">believeth</text:span> not the Son shall not see life; but the wrath of God abideth on him. </text:p>
          </table:table-cell>
          <table:table-cell table:style-name="Table1.C2" office:value-type="string">
            <text:p text:style-name="P1"/>
          </table:table-cell>
        </table:table-row>
        <table:table-row table:style-name="Table1.46">
          <table:table-cell table:style-name="Table1.A2" office:value-type="string">
            <text:p text:style-name="Table_20_Contents"><text:a xlink:type="simple" xlink:href="bible://AVs/Joh%204:21" text:style-name="Internet_20_link" text:visited-style-name="Visited_20_Internet_20_Link"><text:bookmark text:name="Joh Copy 11"/><text:span text:style-name="T1">Joh 4:21</text:span></text:a><text:span text:style-name="T2"> </text:span></text:p>
          </table:table-cell>
          <table:table-cell table:style-name="Table1.A2" office:value-type="string">
            <text:p text:style-name="P1">Jesus saith unto her, <text:span text:style-name="T3">Woman, </text:span><text:span text:style-name="T4">believe</text:span><text:span text:style-name="T3"> me, the hour cometh, when ye shall neither in this mountain, nor yet at Jerusalem, worship the Father.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Joh%204:39" text:style-name="Internet_20_link" text:visited-style-name="Visited_20_Internet_20_Link"><text:bookmark text:name="Joh Copy 12"/><text:span text:style-name="T1">Joh 4:39</text:span></text:a><text:span text:style-name="T2"> </text:span></text:p>
          </table:table-cell>
          <table:table-cell table:style-name="Table1.A2" office:value-type="string">
            <text:p text:style-name="P1">¶ And many of the Samaritans of that city <text:span text:style-name="T9">believed</text:span> on him for the saying of the woman, which testified, He told me all that ever I did. </text:p>
          </table:table-cell>
          <table:table-cell table:style-name="Table1.C2" office:value-type="string">
            <text:p text:style-name="P1"/>
          </table:table-cell>
        </table:table-row>
        <table:table-row table:style-name="Table1.48">
          <table:table-cell table:style-name="Table1.A2" office:value-type="string">
            <text:p text:style-name="Table_20_Contents"><text:a xlink:type="simple" xlink:href="bible://AVs/Joh%204:41" text:style-name="Internet_20_link" text:visited-style-name="Visited_20_Internet_20_Link"><text:bookmark text:name="Joh Copy 13"/><text:span text:style-name="T1">Joh 4:41</text:span></text:a><text:span text:style-name="T2"> </text:span></text:p>
          </table:table-cell>
          <table:table-cell table:style-name="Table1.A2" office:value-type="string">
            <text:p text:style-name="P1">And many more <text:span text:style-name="T9">believed</text:span> because of his own word;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Joh%204:42" text:style-name="Internet_20_link" text:visited-style-name="Visited_20_Internet_20_Link"><text:bookmark text:name="Joh Copy 14"/><text:span text:style-name="T1">Joh 4:42</text:span></text:a><text:span text:style-name="T2"> </text:span></text:p>
          </table:table-cell>
          <table:table-cell table:style-name="Table1.A2" office:value-type="string">
            <text:p text:style-name="P1">And said unto the woman, Now we <text:span text:style-name="T9">believe</text:span>, not because of thy saying: for we have heard <text:span text:style-name="T5">him</text:span> ourselves, and know that this is indeed the Christ, the Saviour of the world. </text:p>
          </table:table-cell>
          <table:table-cell table:style-name="Table1.C2" office:value-type="string">
            <text:p text:style-name="P1"/>
          </table:table-cell>
        </table:table-row>
        <text:soft-page-break/>
        <table:table-row table:style-name="Table1.50">
          <table:table-cell table:style-name="Table1.A2" office:value-type="string">
            <text:p text:style-name="Table_20_Contents"><text:a xlink:type="simple" xlink:href="bible://AVs/Joh%204:48" text:style-name="Internet_20_link" text:visited-style-name="Visited_20_Internet_20_Link"><text:bookmark text:name="Joh Copy 15"/><text:span text:style-name="T1">Joh 4:48</text:span></text:a><text:span text:style-name="T2"> </text:span></text:p>
          </table:table-cell>
          <table:table-cell table:style-name="Table1.A2" office:value-type="string">
            <text:p text:style-name="P1">Then said Jesus unto him, <text:span text:style-name="T3">Except ye see signs and wonders, ye will not </text:span><text:span text:style-name="T4">believe</text:span><text:span text:style-name="T3">.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Joh%204:50" text:style-name="Internet_20_link" text:visited-style-name="Visited_20_Internet_20_Link"><text:bookmark text:name="Joh Copy 16"/><text:span text:style-name="T1">Joh 4:50</text:span></text:a><text:span text:style-name="T2"> </text:span></text:p>
          </table:table-cell>
          <table:table-cell table:style-name="Table1.A2" office:value-type="string">
            <text:p text:style-name="P1">Jesus saith unto him, <text:span text:style-name="T3">Go thy way; thy son liveth.</text:span> And the man <text:span text:style-name="T9">believed</text:span> the word that Jesus had spoken unto him, and he went his way. </text:p>
          </table:table-cell>
          <table:table-cell table:style-name="Table1.C2" office:value-type="string">
            <text:p text:style-name="P1"/>
          </table:table-cell>
        </table:table-row>
        <table:table-row table:style-name="Table1.52">
          <table:table-cell table:style-name="Table1.A2" office:value-type="string">
            <text:p text:style-name="Table_20_Contents"><text:a xlink:type="simple" xlink:href="bible://AVs/Joh%204:53" text:style-name="Internet_20_link" text:visited-style-name="Visited_20_Internet_20_Link"><text:bookmark text:name="Joh Copy 17"/><text:span text:style-name="T1">Joh 4:53</text:span></text:a><text:span text:style-name="T2"> </text:span></text:p>
          </table:table-cell>
          <table:table-cell table:style-name="Table1.A2" office:value-type="string">
            <text:p text:style-name="P1">So the father knew that <text:span text:style-name="T5">it was</text:span> at the same hour, in the which Jesus said unto him, <text:span text:style-name="T3">Thy son liveth:</text:span> and himself <text:span text:style-name="T9">believed</text:span>, and his whole house.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Joh%205:24" text:style-name="Internet_20_link" text:visited-style-name="Visited_20_Internet_20_Link"><text:bookmark text:name="Joh Copy 18"/><text:span text:style-name="T1">Joh 5:24</text:span></text:a><text:span text:style-name="T2"> </text:span></text:p>
          </table:table-cell>
          <table:table-cell table:style-name="Table1.A2" office:value-type="string">
            <text:p text:style-name="P1"><text:span text:style-name="T3">Verily, verily, I say unto you, He that heareth my word, and </text:span><text:span text:style-name="T4">believeth</text:span><text:span text:style-name="T3"> on him that sent me, hath everlasting life, and shall not come into condemnation; but is passed from death unto life.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54">
          <table:table-cell table:style-name="Table1.A2" office:value-type="string">
            <text:p text:style-name="Table_20_Contents"><text:a xlink:type="simple" xlink:href="bible://AVs/Joh%205:38" text:style-name="Internet_20_link" text:visited-style-name="Visited_20_Internet_20_Link"><text:bookmark text:name="Joh Copy 19"/><text:span text:style-name="T1">Joh 5:38</text:span></text:a><text:span text:style-name="T2"> </text:span></text:p>
          </table:table-cell>
          <table:table-cell table:style-name="Table1.A2" office:value-type="string">
            <text:p text:style-name="P1"><text:span text:style-name="T3">And ye have not his word abiding in you: for whom he hath sent, him ye </text:span><text:span text:style-name="T4">believe</text:span><text:span text:style-name="T3"> not.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Joh%205:44" text:style-name="Internet_20_link" text:visited-style-name="Visited_20_Internet_20_Link"><text:bookmark text:name="Joh Copy 20"/><text:span text:style-name="T1">Joh 5:44</text:span></text:a><text:span text:style-name="T2"> </text:span></text:p>
          </table:table-cell>
          <table:table-cell table:style-name="Table1.A2" office:value-type="string">
            <text:p text:style-name="P1"><text:span text:style-name="T3">How can ye </text:span><text:span text:style-name="T4">believe</text:span><text:span text:style-name="T3">, which receive honour one of another, and seek not the honour that</text:span> <text:span text:style-name="T5">cometh</text:span> <text:span text:style-name="T3">from God only?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56">
          <table:table-cell table:style-name="Table1.A2" office:value-type="string">
            <text:p text:style-name="Table_20_Contents"><text:a xlink:type="simple" xlink:href="bible://AVs/Joh%205:46" text:style-name="Internet_20_link" text:visited-style-name="Visited_20_Internet_20_Link"><text:bookmark text:name="Joh Copy 21"/><text:span text:style-name="T1">Joh 5:46</text:span></text:a><text:span text:style-name="T2"> </text:span></text:p>
          </table:table-cell>
          <table:table-cell table:style-name="Table1.A2" office:value-type="string">
            <text:p text:style-name="P1"><text:span text:style-name="T3">For had ye </text:span><text:span text:style-name="T4">believed</text:span><text:span text:style-name="T3"> Moses, ye would have </text:span><text:span text:style-name="T4">believed</text:span><text:span text:style-name="T3"> me: for he wrote of me.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Joh%205:47" text:style-name="Internet_20_link" text:visited-style-name="Visited_20_Internet_20_Link"><text:bookmark text:name="Joh Copy 22"/><text:span text:style-name="T1">Joh 5:47</text:span></text:a><text:span text:style-name="T2"> </text:span></text:p>
          </table:table-cell>
          <table:table-cell table:style-name="Table1.A2" office:value-type="string">
            <text:p text:style-name="P1"><text:span text:style-name="T3">But if ye </text:span><text:span text:style-name="T4">believe</text:span><text:span text:style-name="T3"> not his writings, how shall ye </text:span><text:span text:style-name="T4">believe</text:span><text:span text:style-name="T3"> my words?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58">
          <table:table-cell table:style-name="Table1.A2" office:value-type="string">
            <text:p text:style-name="Table_20_Contents"><text:a xlink:type="simple" xlink:href="bible://AVs/Joh%206:29" text:style-name="Internet_20_link" text:visited-style-name="Visited_20_Internet_20_Link"><text:bookmark text:name="Joh Copy 23"/><text:span text:style-name="T1">Joh 6:29</text:span></text:a><text:span text:style-name="T2"> </text:span></text:p>
          </table:table-cell>
          <table:table-cell table:style-name="Table1.A2" office:value-type="string">
            <text:p text:style-name="P1">Jesus answered and said unto them, <text:span text:style-name="T3">This is the work of God, that ye </text:span><text:span text:style-name="T4">believe</text:span><text:span text:style-name="T3"> on him whom he hath sent.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Joh%206:30" text:style-name="Internet_20_link" text:visited-style-name="Visited_20_Internet_20_Link"><text:bookmark text:name="Joh Copy 24"/><text:span text:style-name="T1">Joh 6:30</text:span></text:a><text:span text:style-name="T2"> </text:span></text:p>
          </table:table-cell>
          <table:table-cell table:style-name="Table1.A2" office:value-type="string">
            <text:p text:style-name="P1">They said therefore unto him, What sign shewest thou then, that we may see, and <text:span text:style-name="T9">believe</text:span> thee? what dost thou work? </text:p>
          </table:table-cell>
          <table:table-cell table:style-name="Table1.C2" office:value-type="string">
            <text:p text:style-name="P1"/>
          </table:table-cell>
        </table:table-row>
        <table:table-row table:style-name="Table1.60">
          <table:table-cell table:style-name="Table1.A2" office:value-type="string">
            <text:p text:style-name="Table_20_Contents"><text:a xlink:type="simple" xlink:href="bible://AVs/Joh%206:35" text:style-name="Internet_20_link" text:visited-style-name="Visited_20_Internet_20_Link"><text:bookmark text:name="Joh Copy 25"/><text:span text:style-name="T1">Joh 6:35</text:span></text:a><text:span text:style-name="T2"> </text:span></text:p>
          </table:table-cell>
          <table:table-cell table:style-name="Table1.A2" office:value-type="string">
            <text:p text:style-name="P1">And Jesus said unto them, <text:span text:style-name="T3">I am the bread of life: he that cometh to me shall never hunger; and he that </text:span><text:span text:style-name="T4">believeth</text:span><text:span text:style-name="T3"> on me shall never thirst.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Joh%206:36" text:style-name="Internet_20_link" text:visited-style-name="Visited_20_Internet_20_Link"><text:bookmark text:name="Joh Copy 26"/><text:span text:style-name="T1">Joh 6:36</text:span></text:a><text:span text:style-name="T2"> </text:span></text:p>
          </table:table-cell>
          <table:table-cell table:style-name="Table1.A2" office:value-type="string">
            <text:p text:style-name="P1"><text:span text:style-name="T3">But I said unto you, That ye also have seen me, and </text:span><text:span text:style-name="T4">believe</text:span><text:span text:style-name="T3"> not.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62">
          <table:table-cell table:style-name="Table1.A2" office:value-type="string">
            <text:p text:style-name="Table_20_Contents"><text:a xlink:type="simple" xlink:href="bible://AVs/Joh%206:40" text:style-name="Internet_20_link" text:visited-style-name="Visited_20_Internet_20_Link"><text:bookmark text:name="Joh Copy 27"/><text:span text:style-name="T1">Joh 6:40</text:span></text:a><text:span text:style-name="T2"> </text:span></text:p>
          </table:table-cell>
          <table:table-cell table:style-name="Table1.A2" office:value-type="string">
            <text:p text:style-name="P1"><text:span text:style-name="T3">And this is the will of him that sent me, that every one which seeth the Son, and </text:span><text:span text:style-name="T4">believeth</text:span><text:span text:style-name="T3"> on him, may have everlasting life: and I will raise him up at the last day.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Joh%206:47" text:style-name="Internet_20_link" text:visited-style-name="Visited_20_Internet_20_Link"><text:bookmark text:name="Joh Copy 28"/><text:span text:style-name="T1">Joh 6:47</text:span></text:a><text:span text:style-name="T2"> </text:span></text:p>
          </table:table-cell>
          <table:table-cell table:style-name="Table1.A2" office:value-type="string">
            <text:p text:style-name="P1"><text:span text:style-name="T3">Verily, verily, I say unto you, He that </text:span><text:span text:style-name="T4">believeth</text:span><text:span text:style-name="T3"> on me hath everlasting life.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64">
          <table:table-cell table:style-name="Table1.A2" office:value-type="string">
            <text:p text:style-name="Table_20_Contents"><text:a xlink:type="simple" xlink:href="bible://AVs/Joh%206:64" text:style-name="Internet_20_link" text:visited-style-name="Visited_20_Internet_20_Link"><text:bookmark text:name="Joh Copy 29"/><text:span text:style-name="T1">Joh 6:64</text:span></text:a><text:span text:style-name="T2"> </text:span></text:p>
          </table:table-cell>
          <table:table-cell table:style-name="Table1.A2" office:value-type="string">
            <text:p text:style-name="P1"><text:span text:style-name="T3">But there are some of you that </text:span><text:span text:style-name="T4">believe</text:span><text:span text:style-name="T3"> not.</text:span> For Jesus knew from the beginning who they were that <text:span text:style-name="T9">believed</text:span> not, and who should betray him.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Joh%206:69" text:style-name="Internet_20_link" text:visited-style-name="Visited_20_Internet_20_Link"><text:bookmark text:name="Joh Copy 30"/><text:span text:style-name="T1">Joh 6:69</text:span></text:a><text:span text:style-name="T2"> </text:span></text:p>
          </table:table-cell>
          <table:table-cell table:style-name="Table1.A2" office:value-type="string">
            <text:p text:style-name="P1">And we <text:span text:style-name="T9">believe</text:span> and are sure that thou art that Christ, the Son of the living God. </text:p>
          </table:table-cell>
          <table:table-cell table:style-name="Table1.C2" office:value-type="string">
            <text:p text:style-name="P1"/>
          </table:table-cell>
        </table:table-row>
        <table:table-row table:style-name="Table1.66">
          <table:table-cell table:style-name="Table1.A2" office:value-type="string">
            <text:p text:style-name="Table_20_Contents"><text:a xlink:type="simple" xlink:href="bible://AVs/Joh%207:5" text:style-name="Internet_20_link" text:visited-style-name="Visited_20_Internet_20_Link"><text:bookmark text:name="Joh Copy 31"/><text:span text:style-name="T1">Joh 7:5</text:span></text:a><text:span text:style-name="T2"> </text:span></text:p>
          </table:table-cell>
          <table:table-cell table:style-name="Table1.A2" office:value-type="string">
            <text:p text:style-name="P1">For neither did his brethren <text:span text:style-name="T9">believe</text:span> in him.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Joh%207:31" text:style-name="Internet_20_link" text:visited-style-name="Visited_20_Internet_20_Link"><text:bookmark text:name="Joh Copy 32"/><text:span text:style-name="T1">Joh 7:31</text:span></text:a><text:span text:style-name="T2"> </text:span></text:p>
          </table:table-cell>
          <table:table-cell table:style-name="Table1.A2" office:value-type="string">
            <text:p text:style-name="P1">And many of the people <text:span text:style-name="T9">believed</text:span> on him, and said, When Christ cometh, will he do more miracles than these which this <text:span text:style-name="T5">man</text:span> hath done? </text:p>
          </table:table-cell>
          <table:table-cell table:style-name="Table1.C2" office:value-type="string">
            <text:p text:style-name="P1"/>
          </table:table-cell>
        </table:table-row>
        <table:table-row table:style-name="Table1.68">
          <table:table-cell table:style-name="Table1.A2" office:value-type="string">
            <text:p text:style-name="Table_20_Contents"><text:a xlink:type="simple" xlink:href="bible://AVs/Joh%207:38" text:style-name="Internet_20_link" text:visited-style-name="Visited_20_Internet_20_Link"><text:bookmark text:name="Joh Copy 33"/><text:span text:style-name="T1">Joh 7:38</text:span></text:a><text:span text:style-name="T2"> </text:span></text:p>
          </table:table-cell>
          <table:table-cell table:style-name="Table1.A2" office:value-type="string">
            <text:p text:style-name="P1"><text:span text:style-name="T3">He that </text:span><text:span text:style-name="T4">believeth</text:span><text:span text:style-name="T3"> on me, as the scripture hath said, out of his belly shall flow rivers of living water.</text:span> </text:p>
          </table:table-cell>
          <table:table-cell table:style-name="Table1.C2" office:value-type="string">
            <text:p text:style-name="P1"/>
          </table:table-cell>
        </table:table-row>
        <text:soft-page-break/>
        <table:table-row table:style-name="Table1.1">
          <table:table-cell table:style-name="Table1.A2" office:value-type="string">
            <text:p text:style-name="Table_20_Contents"><text:a xlink:type="simple" xlink:href="bible://AVs/Joh%207:39" text:style-name="Internet_20_link" text:visited-style-name="Visited_20_Internet_20_Link"><text:bookmark text:name="Joh Copy 34"/><text:span text:style-name="T1">Joh 7:39</text:span></text:a><text:span text:style-name="T2"> </text:span></text:p>
          </table:table-cell>
          <table:table-cell table:style-name="Table1.A2" office:value-type="string">
            <text:p text:style-name="P1">(But this spake he of the Spirit, which they that <text:span text:style-name="T9">believe</text:span> on him should receive: for the Holy Ghost was not yet <text:span text:style-name="T5">given</text:span>; because that Jesus was not yet glorified.) </text:p>
          </table:table-cell>
          <table:table-cell table:style-name="Table1.C2" office:value-type="string">
            <text:p text:style-name="P1"/>
          </table:table-cell>
        </table:table-row>
        <table:table-row table:style-name="Table1.70">
          <table:table-cell table:style-name="Table1.A2" office:value-type="string">
            <text:p text:style-name="Table_20_Contents"><text:a xlink:type="simple" xlink:href="bible://AVs/Joh%207:48" text:style-name="Internet_20_link" text:visited-style-name="Visited_20_Internet_20_Link"><text:bookmark text:name="Joh Copy 35"/><text:span text:style-name="T1">Joh 7:48</text:span></text:a><text:span text:style-name="T2"> </text:span></text:p>
          </table:table-cell>
          <table:table-cell table:style-name="Table1.A2" office:value-type="string">
            <text:p text:style-name="P1">Have any of the rulers or of the Pharisees <text:span text:style-name="T9">believed</text:span> on him?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Joh%208:24" text:style-name="Internet_20_link" text:visited-style-name="Visited_20_Internet_20_Link"><text:bookmark text:name="Joh Copy 36"/><text:span text:style-name="T1">Joh 8:24</text:span></text:a><text:span text:style-name="T2"> </text:span></text:p>
          </table:table-cell>
          <table:table-cell table:style-name="Table1.A2" office:value-type="string">
            <text:p text:style-name="P1"><text:span text:style-name="T3">I said therefore unto you, that ye shall die in your sins: for if ye </text:span><text:span text:style-name="T4">believe</text:span><text:span text:style-name="T3"> not that I am</text:span> <text:span text:style-name="T5">he</text:span>, <text:span text:style-name="T3">ye shall die in your sins.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72">
          <table:table-cell table:style-name="Table1.A2" office:value-type="string">
            <text:p text:style-name="Table_20_Contents"><text:a xlink:type="simple" xlink:href="bible://AVs/Joh%208:30" text:style-name="Internet_20_link" text:visited-style-name="Visited_20_Internet_20_Link"><text:bookmark text:name="Joh Copy 37"/><text:span text:style-name="T1">Joh 8:30</text:span></text:a><text:span text:style-name="T2"> </text:span></text:p>
          </table:table-cell>
          <table:table-cell table:style-name="Table1.A2" office:value-type="string">
            <text:p text:style-name="P1">As he spake these words, many <text:span text:style-name="T9">believed</text:span> on him.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Joh%208:31" text:style-name="Internet_20_link" text:visited-style-name="Visited_20_Internet_20_Link"><text:bookmark text:name="Joh Copy 38"/><text:span text:style-name="T1">Joh 8:31</text:span></text:a><text:span text:style-name="T2"> </text:span></text:p>
          </table:table-cell>
          <table:table-cell table:style-name="Table1.A2" office:value-type="string">
            <text:p text:style-name="P1">Then said Jesus to those Jews which <text:span text:style-name="T9">believed</text:span> on him, <text:span text:style-name="T3">If ye continue in my word,</text:span> <text:span text:style-name="T5">then</text:span> <text:span text:style-name="T3">are ye my disciples indeed;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74">
          <table:table-cell table:style-name="Table1.A2" office:value-type="string">
            <text:p text:style-name="Table_20_Contents"><text:a xlink:type="simple" xlink:href="bible://AVs/Joh%208:45" text:style-name="Internet_20_link" text:visited-style-name="Visited_20_Internet_20_Link"><text:bookmark text:name="Joh Copy 39"/><text:span text:style-name="T1">Joh 8:45</text:span></text:a><text:span text:style-name="T2"> </text:span></text:p>
          </table:table-cell>
          <table:table-cell table:style-name="Table1.A2" office:value-type="string">
            <text:p text:style-name="P1"><text:span text:style-name="T3">And because I tell</text:span> <text:span text:style-name="T5">you</text:span> <text:span text:style-name="T3">the truth, ye </text:span><text:span text:style-name="T4">believe</text:span><text:span text:style-name="T3"> me not.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Joh%208:46" text:style-name="Internet_20_link" text:visited-style-name="Visited_20_Internet_20_Link"><text:bookmark text:name="Joh Copy 40"/><text:span text:style-name="T1">Joh 8:46</text:span></text:a><text:span text:style-name="T2"> </text:span></text:p>
          </table:table-cell>
          <table:table-cell table:style-name="Table1.A2" office:value-type="string">
            <text:p text:style-name="P1"><text:span text:style-name="T3">Which of you convinceth me of sin? And if I say the truth, why do ye not </text:span><text:span text:style-name="T4">believe</text:span><text:span text:style-name="T3"> me?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76">
          <table:table-cell table:style-name="Table1.A2" office:value-type="string">
            <text:p text:style-name="Table_20_Contents"><text:a xlink:type="simple" xlink:href="bible://AVs/Joh%209:18" text:style-name="Internet_20_link" text:visited-style-name="Visited_20_Internet_20_Link"><text:bookmark text:name="Joh Copy 41"/><text:span text:style-name="T1">Joh 9:18</text:span></text:a><text:span text:style-name="T2"> </text:span></text:p>
          </table:table-cell>
          <table:table-cell table:style-name="Table1.A2" office:value-type="string">
            <text:p text:style-name="P1">But the Jews did not <text:span text:style-name="T9">believe</text:span> concerning him, that he had been blind, and received his sight, until they called the parents of him that had received his sight.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Joh%209:35" text:style-name="Internet_20_link" text:visited-style-name="Visited_20_Internet_20_Link"><text:bookmark text:name="Joh Copy 42"/><text:span text:style-name="T1">Joh 9:35</text:span></text:a><text:span text:style-name="T2"> </text:span></text:p>
          </table:table-cell>
          <table:table-cell table:style-name="Table1.A2" office:value-type="string">
            <text:p text:style-name="P1">Jesus heard that they had cast him out; and when he had found him, he said unto him, <text:span text:style-name="T3">Dost thou </text:span><text:span text:style-name="T4">believe</text:span><text:span text:style-name="T3"> on the Son of God?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78">
          <table:table-cell table:style-name="Table1.A2" office:value-type="string">
            <text:p text:style-name="Table_20_Contents"><text:a xlink:type="simple" xlink:href="bible://AVs/Joh%209:36" text:style-name="Internet_20_link" text:visited-style-name="Visited_20_Internet_20_Link"><text:bookmark text:name="Joh Copy 43"/><text:span text:style-name="T1">Joh 9:36</text:span></text:a><text:span text:style-name="T2"> </text:span></text:p>
          </table:table-cell>
          <table:table-cell table:style-name="Table1.A2" office:value-type="string">
            <text:p text:style-name="P1">He answered and said, Who is he, Lord, that I might <text:span text:style-name="T9">believe</text:span> on him?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Joh%209:38" text:style-name="Internet_20_link" text:visited-style-name="Visited_20_Internet_20_Link"><text:bookmark text:name="Joh Copy 44"/><text:span text:style-name="T1">Joh 9:38</text:span></text:a><text:span text:style-name="T2"> </text:span></text:p>
          </table:table-cell>
          <table:table-cell table:style-name="Table1.A2" office:value-type="string">
            <text:p text:style-name="P1">And he said, Lord, I <text:span text:style-name="T9">believe</text:span>. And he worshipped him. </text:p>
          </table:table-cell>
          <table:table-cell table:style-name="Table1.C2" office:value-type="string">
            <text:p text:style-name="P1"/>
          </table:table-cell>
        </table:table-row>
        <table:table-row table:style-name="Table1.80">
          <table:table-cell table:style-name="Table1.A2" office:value-type="string">
            <text:p text:style-name="Table_20_Contents"><text:a xlink:type="simple" xlink:href="bible://AVs/Joh%2010:25" text:style-name="Internet_20_link" text:visited-style-name="Visited_20_Internet_20_Link"><text:bookmark text:name="Joh Copy 45"/><text:span text:style-name="T1">Joh 10:25</text:span></text:a><text:span text:style-name="T2"> </text:span></text:p>
          </table:table-cell>
          <table:table-cell table:style-name="Table1.A2" office:value-type="string">
            <text:p text:style-name="P1">Jesus answered them, <text:span text:style-name="T3">I told you, and ye </text:span><text:span text:style-name="T4">believed</text:span><text:span text:style-name="T3"> not: the works that I do in my Father's name, they bear witness of me.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Joh%2010:26" text:style-name="Internet_20_link" text:visited-style-name="Visited_20_Internet_20_Link"><text:bookmark text:name="Joh Copy 46"/><text:span text:style-name="T1">Joh 10:26</text:span></text:a><text:span text:style-name="T2"> </text:span></text:p>
          </table:table-cell>
          <table:table-cell table:style-name="Table1.A2" office:value-type="string">
            <text:p text:style-name="P1"><text:span text:style-name="T3">But ye </text:span><text:span text:style-name="T4">believe</text:span><text:span text:style-name="T3"> not, because ye are not of my sheep, as I said unto you.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82">
          <table:table-cell table:style-name="Table1.A2" office:value-type="string">
            <text:p text:style-name="Table_20_Contents"><text:a xlink:type="simple" xlink:href="bible://AVs/Joh%2010:37" text:style-name="Internet_20_link" text:visited-style-name="Visited_20_Internet_20_Link"><text:bookmark text:name="Joh Copy 47"/><text:span text:style-name="T1">Joh 10:37</text:span></text:a><text:span text:style-name="T2"> </text:span></text:p>
          </table:table-cell>
          <table:table-cell table:style-name="Table1.A2" office:value-type="string">
            <text:p text:style-name="P1"><text:span text:style-name="T3">If I do not the works of my Father, </text:span><text:span text:style-name="T4">believe</text:span><text:span text:style-name="T3"> me not.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Joh%2010:38" text:style-name="Internet_20_link" text:visited-style-name="Visited_20_Internet_20_Link"><text:bookmark text:name="Joh Copy 48"/><text:span text:style-name="T1">Joh 10:38</text:span></text:a><text:span text:style-name="T2"> </text:span></text:p>
          </table:table-cell>
          <table:table-cell table:style-name="Table1.A2" office:value-type="string">
            <text:p text:style-name="P1"><text:span text:style-name="T3">But if I do, though ye </text:span><text:span text:style-name="T4">believe</text:span><text:span text:style-name="T3"> not me, </text:span><text:span text:style-name="T4">believe</text:span><text:span text:style-name="T3"> the works: that ye may know, and </text:span><text:span text:style-name="T4">believe</text:span><text:span text:style-name="T3">, that the Father</text:span> <text:span text:style-name="T5">is</text:span> <text:span text:style-name="T3">in me, and I in him.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84">
          <table:table-cell table:style-name="Table1.A2" office:value-type="string">
            <text:p text:style-name="Table_20_Contents"><text:a xlink:type="simple" xlink:href="bible://AVs/Joh%2010:42" text:style-name="Internet_20_link" text:visited-style-name="Visited_20_Internet_20_Link"><text:bookmark text:name="Joh Copy 49"/><text:span text:style-name="T1">Joh 10:42</text:span></text:a><text:span text:style-name="T2"> </text:span></text:p>
          </table:table-cell>
          <table:table-cell table:style-name="Table1.A2" office:value-type="string">
            <text:p text:style-name="P1">And many <text:span text:style-name="T9">believed</text:span> on him there.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Joh%2011:15" text:style-name="Internet_20_link" text:visited-style-name="Visited_20_Internet_20_Link"><text:bookmark text:name="Joh Copy 50"/><text:span text:style-name="T1">Joh 11:15</text:span></text:a><text:span text:style-name="T2"> </text:span></text:p>
          </table:table-cell>
          <table:table-cell table:style-name="Table1.A2" office:value-type="string">
            <text:p text:style-name="P1"><text:span text:style-name="T3">And I am glad for your sakes that I was not there, to the intent ye may </text:span><text:span text:style-name="T4">believe</text:span><text:span text:style-name="T3">; nevertheless let us go unto him.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86">
          <table:table-cell table:style-name="Table1.A2" office:value-type="string">
            <text:p text:style-name="Table_20_Contents"><text:a xlink:type="simple" xlink:href="bible://AVs/Joh%2011:25" text:style-name="Internet_20_link" text:visited-style-name="Visited_20_Internet_20_Link"><text:bookmark text:name="Joh Copy 51"/><text:span text:style-name="T1">Joh 11:25</text:span></text:a><text:span text:style-name="T2"> </text:span></text:p>
          </table:table-cell>
          <table:table-cell table:style-name="Table1.A2" office:value-type="string">
            <text:p text:style-name="P1">Jesus said unto her, <text:span text:style-name="T3">I am the resurrection, and the life: he that </text:span><text:span text:style-name="T4">believeth</text:span><text:span text:style-name="T3"> in me, though he were dead, yet shall he live: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Joh%2011:26" text:style-name="Internet_20_link" text:visited-style-name="Visited_20_Internet_20_Link"><text:bookmark text:name="Joh Copy 52"/><text:span text:style-name="T1">Joh 11:26</text:span></text:a><text:span text:style-name="T2"> </text:span></text:p>
          </table:table-cell>
          <table:table-cell table:style-name="Table1.A2" office:value-type="string">
            <text:p text:style-name="P1"><text:span text:style-name="T3">And whosoever liveth and </text:span><text:span text:style-name="T4">believeth</text:span><text:span text:style-name="T3"> in me shall never die. </text:span><text:span text:style-name="T4">Believest</text:span><text:span text:style-name="T3"> thou this?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88">
          <table:table-cell table:style-name="Table1.A2" office:value-type="string">
            <text:p text:style-name="Table_20_Contents"><text:a xlink:type="simple" xlink:href="bible://AVs/Joh%2011:27" text:style-name="Internet_20_link" text:visited-style-name="Visited_20_Internet_20_Link"><text:bookmark text:name="Joh Copy 53"/><text:span text:style-name="T1">Joh 11:27</text:span></text:a><text:span text:style-name="T2"> </text:span></text:p>
          </table:table-cell>
          <table:table-cell table:style-name="Table1.A2" office:value-type="string">
            <text:p text:style-name="P1">She saith unto him, Yea, Lord: I <text:span text:style-name="T9">believe</text:span> that thou art the Christ, the Son of God, which should come into the world.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Joh%2011:40" text:style-name="Internet_20_link" text:visited-style-name="Visited_20_Internet_20_Link"><text:bookmark text:name="Joh Copy 54"/><text:span text:style-name="T1">Joh 11:40</text:span></text:a><text:span text:style-name="T2"> </text:span></text:p>
          </table:table-cell>
          <table:table-cell table:style-name="Table1.A2" office:value-type="string">
            <text:p text:style-name="P1">Jesus saith unto her, <text:span text:style-name="T3">Said I not unto thee, that, if thou wouldest </text:span><text:span text:style-name="T4">believe</text:span><text:span text:style-name="T3">, thou shouldest see the glory of God?</text:span> </text:p>
          </table:table-cell>
          <table:table-cell table:style-name="Table1.C2" office:value-type="string">
            <text:p text:style-name="P1"/>
          </table:table-cell>
        </table:table-row>
        <text:soft-page-break/>
        <table:table-row table:style-name="Table1.90">
          <table:table-cell table:style-name="Table1.A2" office:value-type="string">
            <text:p text:style-name="Table_20_Contents"><text:a xlink:type="simple" xlink:href="bible://AVs/Joh%2011:42" text:style-name="Internet_20_link" text:visited-style-name="Visited_20_Internet_20_Link"><text:bookmark text:name="Joh Copy 55"/><text:span text:style-name="T1">Joh 11:42</text:span></text:a><text:span text:style-name="T2"> </text:span></text:p>
          </table:table-cell>
          <table:table-cell table:style-name="Table1.A2" office:value-type="string">
            <text:p text:style-name="P1"><text:span text:style-name="T3">And I knew that thou hearest me always: but because of the people which stand by I said</text:span> <text:span text:style-name="T5">it</text:span>, <text:span text:style-name="T3">that they may </text:span><text:span text:style-name="T4">believe</text:span><text:span text:style-name="T3"> that thou hast sent me.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Joh%2011:45" text:style-name="Internet_20_link" text:visited-style-name="Visited_20_Internet_20_Link"><text:bookmark text:name="Joh Copy 56"/><text:span text:style-name="T1">Joh 11:45</text:span></text:a><text:span text:style-name="T2"> </text:span></text:p>
          </table:table-cell>
          <table:table-cell table:style-name="Table1.A2" office:value-type="string">
            <text:p text:style-name="P1">Then many of the Jews which came to Mary, and had seen the things which Jesus did, <text:span text:style-name="T9">believed</text:span> on him. </text:p>
          </table:table-cell>
          <table:table-cell table:style-name="Table1.C2" office:value-type="string">
            <text:p text:style-name="P1"/>
          </table:table-cell>
        </table:table-row>
        <table:table-row table:style-name="Table1.92">
          <table:table-cell table:style-name="Table1.A2" office:value-type="string">
            <text:p text:style-name="Table_20_Contents"><text:a xlink:type="simple" xlink:href="bible://AVs/Joh%2011:48" text:style-name="Internet_20_link" text:visited-style-name="Visited_20_Internet_20_Link"><text:bookmark text:name="Joh Copy 57"/><text:span text:style-name="T1">Joh 11:48</text:span></text:a><text:span text:style-name="T2"> </text:span></text:p>
          </table:table-cell>
          <table:table-cell table:style-name="Table1.A2" office:value-type="string">
            <text:p text:style-name="P1">If we let him thus alone, all <text:span text:style-name="T5">men</text:span> will <text:span text:style-name="T9">believe</text:span> on him: and the Romans shall come and take away both our place and nation.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Joh%2012:11" text:style-name="Internet_20_link" text:visited-style-name="Visited_20_Internet_20_Link"><text:bookmark text:name="Joh Copy 58"/><text:span text:style-name="T1">Joh 12:11</text:span></text:a><text:span text:style-name="T2"> </text:span></text:p>
          </table:table-cell>
          <table:table-cell table:style-name="Table1.A2" office:value-type="string">
            <text:p text:style-name="P1">Because that by reason of him many of the Jews went away, and <text:span text:style-name="T9">believed</text:span> on Jesus. </text:p>
          </table:table-cell>
          <table:table-cell table:style-name="Table1.C2" office:value-type="string">
            <text:p text:style-name="P1"/>
          </table:table-cell>
        </table:table-row>
        <table:table-row table:style-name="Table1.94">
          <table:table-cell table:style-name="Table1.A2" office:value-type="string">
            <text:p text:style-name="Table_20_Contents"><text:a xlink:type="simple" xlink:href="bible://AVs/Joh%2012:36" text:style-name="Internet_20_link" text:visited-style-name="Visited_20_Internet_20_Link"><text:bookmark text:name="Joh Copy 59"/><text:span text:style-name="T1">Joh 12:36</text:span></text:a><text:span text:style-name="T2"> </text:span></text:p>
          </table:table-cell>
          <table:table-cell table:style-name="Table1.A2" office:value-type="string">
            <text:p text:style-name="P1"><text:span text:style-name="T3">While ye have light, </text:span><text:span text:style-name="T4">believe</text:span><text:span text:style-name="T3"> in the light, that ye may be the children of light.</text:span> These things spake Jesus, and departed, and did hide himself from them.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Joh%2012:37" text:style-name="Internet_20_link" text:visited-style-name="Visited_20_Internet_20_Link"><text:bookmark text:name="Joh Copy 60"/><text:span text:style-name="T1">Joh 12:37</text:span></text:a><text:span text:style-name="T2"> </text:span></text:p>
          </table:table-cell>
          <table:table-cell table:style-name="Table1.A2" office:value-type="string">
            <text:p text:style-name="P1">¶ But though he had done so many miracles before them, yet they <text:span text:style-name="T9">believed</text:span> not on him: </text:p>
          </table:table-cell>
          <table:table-cell table:style-name="Table1.C2" office:value-type="string">
            <text:p text:style-name="P1"/>
          </table:table-cell>
        </table:table-row>
        <table:table-row table:style-name="Table1.96">
          <table:table-cell table:style-name="Table1.A2" office:value-type="string">
            <text:p text:style-name="Table_20_Contents"><text:a xlink:type="simple" xlink:href="bible://AVs/Joh%2012:38" text:style-name="Internet_20_link" text:visited-style-name="Visited_20_Internet_20_Link"><text:bookmark text:name="Joh Copy 61"/><text:span text:style-name="T1">Joh 12:38</text:span></text:a><text:span text:style-name="T2"> </text:span></text:p>
          </table:table-cell>
          <table:table-cell table:style-name="Table1.A2" office:value-type="string">
            <text:p text:style-name="P1">That the saying of Esaias the prophet might be fulfilled, which he spake, Lord, who hath <text:span text:style-name="T9">believed</text:span> our report? and to whom hath the arm of the Lord been revealed?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Joh%2012:39" text:style-name="Internet_20_link" text:visited-style-name="Visited_20_Internet_20_Link"><text:bookmark text:name="Joh Copy 62"/><text:span text:style-name="T1">Joh 12:39</text:span></text:a><text:span text:style-name="T2"> </text:span></text:p>
          </table:table-cell>
          <table:table-cell table:style-name="Table1.A2" office:value-type="string">
            <text:p text:style-name="P1">Therefore they could not <text:span text:style-name="T9">believe</text:span>, because that Esaias said again, </text:p>
          </table:table-cell>
          <table:table-cell table:style-name="Table1.C2" office:value-type="string">
            <text:p text:style-name="P1"/>
          </table:table-cell>
        </table:table-row>
        <table:table-row table:style-name="Table1.98">
          <table:table-cell table:style-name="Table1.A2" office:value-type="string">
            <text:p text:style-name="Table_20_Contents"><text:a xlink:type="simple" xlink:href="bible://AVs/Joh%2012:42" text:style-name="Internet_20_link" text:visited-style-name="Visited_20_Internet_20_Link"><text:bookmark text:name="Joh Copy 63"/><text:span text:style-name="T1">Joh 12:42</text:span></text:a><text:span text:style-name="T2"> </text:span></text:p>
          </table:table-cell>
          <table:table-cell table:style-name="Table1.A2" office:value-type="string">
            <text:p text:style-name="P1">¶ Nevertheless among the chief rulers also many <text:span text:style-name="T9">believed</text:span> on him; but because of the Pharisees they did not confess <text:span text:style-name="T5">him</text:span>, lest they should be put out of the synagogue: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Joh%2012:44" text:style-name="Internet_20_link" text:visited-style-name="Visited_20_Internet_20_Link"><text:bookmark text:name="Joh Copy 64"/><text:span text:style-name="T1">Joh 12:44</text:span></text:a><text:span text:style-name="T2"> </text:span></text:p>
          </table:table-cell>
          <table:table-cell table:style-name="Table1.A2" office:value-type="string">
            <text:p text:style-name="P1">¶ Jesus cried and said, <text:span text:style-name="T3">He that </text:span><text:span text:style-name="T4">believeth</text:span><text:span text:style-name="T3"> on me, </text:span><text:span text:style-name="T4">believeth</text:span><text:span text:style-name="T3"> not on me, but on him that sent me.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100">
          <table:table-cell table:style-name="Table1.A2" office:value-type="string">
            <text:p text:style-name="Table_20_Contents"><text:a xlink:type="simple" xlink:href="bible://AVs/Joh%2012:46" text:style-name="Internet_20_link" text:visited-style-name="Visited_20_Internet_20_Link"><text:bookmark text:name="Joh Copy 65"/><text:span text:style-name="T1">Joh 12:46</text:span></text:a><text:span text:style-name="T2"> </text:span></text:p>
          </table:table-cell>
          <table:table-cell table:style-name="Table1.A2" office:value-type="string">
            <text:p text:style-name="P1"><text:span text:style-name="T3">I am come a light into the world, that whosoever </text:span><text:span text:style-name="T4">believeth</text:span><text:span text:style-name="T3"> on me should not abide in darkness.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Joh%2012:47" text:style-name="Internet_20_link" text:visited-style-name="Visited_20_Internet_20_Link"><text:bookmark text:name="Joh Copy 66"/><text:span text:style-name="T1">Joh 12:47</text:span></text:a><text:span text:style-name="T2"> </text:span></text:p>
          </table:table-cell>
          <table:table-cell table:style-name="Table1.A2" office:value-type="string">
            <text:p text:style-name="P1"><text:span text:style-name="T3">And if any man hear my words, and </text:span><text:span text:style-name="T4">believe</text:span><text:span text:style-name="T3"> not, I judge him not: for I came not to judge the world, but to save the world.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102">
          <table:table-cell table:style-name="Table1.A2" office:value-type="string">
            <text:p text:style-name="Table_20_Contents"><text:a xlink:type="simple" xlink:href="bible://AVs/Joh%2013:19" text:style-name="Internet_20_link" text:visited-style-name="Visited_20_Internet_20_Link"><text:bookmark text:name="Joh Copy 67"/><text:span text:style-name="T1">Joh 13:19</text:span></text:a><text:span text:style-name="T2"> </text:span></text:p>
          </table:table-cell>
          <table:table-cell table:style-name="Table1.A2" office:value-type="string">
            <text:p text:style-name="P1"><text:span text:style-name="T3">Now</text:span><text:a xlink:type="simple" xlink:href="../../../Apps/Bible%20Analyzer%205.6%20Portable/bibleFN/AVs/Joh%2013:19://2" text:style-name="Internet_20_link" text:visited-style-name="Visited_20_Internet_20_Link"><text:span text:style-name="T10">2</text:span></text:a><text:span text:style-name="T3"> I tell you before it come, that, when it is come to pass, ye may </text:span><text:span text:style-name="T4">believe</text:span><text:span text:style-name="T3"> that I am</text:span> <text:span text:style-name="T5">he</text:span>.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Joh%2014:1" text:style-name="Internet_20_link" text:visited-style-name="Visited_20_Internet_20_Link"><text:bookmark text:name="Joh Copy 68"/><text:span text:style-name="T1">Joh 14:1</text:span></text:a><text:span text:style-name="T2"> </text:span></text:p>
          </table:table-cell>
          <table:table-cell table:style-name="Table1.A2" office:value-type="string">
            <text:p text:style-name="P1">¶ <text:span text:style-name="T3">Let not your heart be troubled: ye </text:span><text:span text:style-name="T4">believe</text:span><text:span text:style-name="T3"> in God, </text:span><text:span text:style-name="T4">believe</text:span><text:span text:style-name="T3"> also in me.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104">
          <table:table-cell table:style-name="Table1.A2" office:value-type="string">
            <text:p text:style-name="Table_20_Contents"><text:a xlink:type="simple" xlink:href="bible://AVs/Joh%2014:10" text:style-name="Internet_20_link" text:visited-style-name="Visited_20_Internet_20_Link"><text:bookmark text:name="Joh Copy 69"/><text:span text:style-name="T1">Joh 14:10</text:span></text:a><text:span text:style-name="T2"> </text:span></text:p>
          </table:table-cell>
          <table:table-cell table:style-name="Table1.A2" office:value-type="string">
            <text:p text:style-name="P1"><text:span text:style-name="T4">Believest</text:span><text:span text:style-name="T3"> thou not that I am in the Father, and the Father in me? the words that I speak unto you I speak not of myself: but the Father that dwelleth in me, he doeth the works.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Joh%2014:11" text:style-name="Internet_20_link" text:visited-style-name="Visited_20_Internet_20_Link"><text:bookmark text:name="Joh Copy 70"/><text:span text:style-name="T1">Joh 14:11</text:span></text:a><text:span text:style-name="T2"> </text:span></text:p>
          </table:table-cell>
          <table:table-cell table:style-name="Table1.A2" office:value-type="string">
            <text:p text:style-name="P1"><text:span text:style-name="T4">Believe</text:span><text:span text:style-name="T3"> me that I</text:span> <text:span text:style-name="T5">am</text:span> <text:span text:style-name="T3">in the Father, and the Father in me: or else </text:span><text:span text:style-name="T4">believe</text:span><text:span text:style-name="T3"> me for the very works' sake.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106">
          <table:table-cell table:style-name="Table1.A2" office:value-type="string">
            <text:p text:style-name="Table_20_Contents"><text:a xlink:type="simple" xlink:href="bible://AVs/Joh%2014:12" text:style-name="Internet_20_link" text:visited-style-name="Visited_20_Internet_20_Link"><text:bookmark text:name="Joh Copy 71"/><text:span text:style-name="T1">Joh 14:12</text:span></text:a><text:span text:style-name="T2"> </text:span></text:p>
          </table:table-cell>
          <table:table-cell table:style-name="Table1.A2" office:value-type="string">
            <text:p text:style-name="P1"><text:span text:style-name="T3">Verily, verily, I say unto you, He that </text:span><text:span text:style-name="T4">believeth</text:span><text:span text:style-name="T3"> on me, the works that I do shall he do also; and greater</text:span> <text:span text:style-name="T5">works</text:span> <text:span text:style-name="T3">than these shall he do; because I go unto my Father.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Joh%2014:29" text:style-name="Internet_20_link" text:visited-style-name="Visited_20_Internet_20_Link"><text:bookmark text:name="Joh Copy 72"/><text:span text:style-name="T1">Joh 14:29</text:span></text:a><text:span text:style-name="T2"> </text:span></text:p>
          </table:table-cell>
          <table:table-cell table:style-name="Table1.A2" office:value-type="string">
            <text:p text:style-name="P1"><text:span text:style-name="T3">And now I have told you before it come to pass, that, when it is come to pass, ye might </text:span><text:span text:style-name="T4">believe</text:span><text:span text:style-name="T3">.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108">
          <table:table-cell table:style-name="Table1.A2" office:value-type="string">
            <text:p text:style-name="Table_20_Contents"><text:a xlink:type="simple" xlink:href="bible://AVs/Joh%2016:9" text:style-name="Internet_20_link" text:visited-style-name="Visited_20_Internet_20_Link"><text:bookmark text:name="Joh Copy 73"/><text:span text:style-name="T1">Joh 16:9</text:span></text:a><text:span text:style-name="T2"> </text:span></text:p>
          </table:table-cell>
          <table:table-cell table:style-name="Table1.A2" office:value-type="string">
            <text:p text:style-name="P1"><text:span text:style-name="T3">Of sin, because they </text:span><text:span text:style-name="T4">believe</text:span><text:span text:style-name="T3"> not on me;</text:span> </text:p>
          </table:table-cell>
          <table:table-cell table:style-name="Table1.C2" office:value-type="string">
            <text:p text:style-name="P1"/>
          </table:table-cell>
        </table:table-row>
        <text:soft-page-break/>
        <table:table-row table:style-name="Table1.1">
          <table:table-cell table:style-name="Table1.A2" office:value-type="string">
            <text:p text:style-name="Table_20_Contents"><text:a xlink:type="simple" xlink:href="bible://AVs/Joh%2016:27" text:style-name="Internet_20_link" text:visited-style-name="Visited_20_Internet_20_Link"><text:bookmark text:name="Joh Copy 74"/><text:span text:style-name="T1">Joh 16:27</text:span></text:a><text:span text:style-name="T2"> </text:span></text:p>
          </table:table-cell>
          <table:table-cell table:style-name="Table1.A2" office:value-type="string">
            <text:p text:style-name="P1"><text:span text:style-name="T3">For the Father himself loveth you, because ye have loved me, and have </text:span><text:span text:style-name="T4">believed</text:span><text:span text:style-name="T3"> that I came out from God.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110">
          <table:table-cell table:style-name="Table1.A2" office:value-type="string">
            <text:p text:style-name="Table_20_Contents"><text:a xlink:type="simple" xlink:href="bible://AVs/Joh%2016:30" text:style-name="Internet_20_link" text:visited-style-name="Visited_20_Internet_20_Link"><text:bookmark text:name="Joh Copy 75"/><text:span text:style-name="T1">Joh 16:30</text:span></text:a><text:span text:style-name="T2"> </text:span></text:p>
          </table:table-cell>
          <table:table-cell table:style-name="Table1.A2" office:value-type="string">
            <text:p text:style-name="P1">Now are we sure that thou knowest all things, and needest not that any man should ask thee: by this we <text:span text:style-name="T9">believe</text:span> that thou camest forth from God.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Joh%2016:31" text:style-name="Internet_20_link" text:visited-style-name="Visited_20_Internet_20_Link"><text:bookmark text:name="Joh Copy 76"/><text:span text:style-name="T1">Joh 16:31</text:span></text:a><text:span text:style-name="T2"> </text:span></text:p>
          </table:table-cell>
          <table:table-cell table:style-name="Table1.A2" office:value-type="string">
            <text:p text:style-name="P1">Jesus answered them, <text:span text:style-name="T3">Do ye now </text:span><text:span text:style-name="T4">believe</text:span><text:span text:style-name="T3">?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112">
          <table:table-cell table:style-name="Table1.A2" office:value-type="string">
            <text:p text:style-name="Table_20_Contents"><text:a xlink:type="simple" xlink:href="bible://AVs/Joh%2017:8" text:style-name="Internet_20_link" text:visited-style-name="Visited_20_Internet_20_Link"><text:bookmark text:name="Joh Copy 77"/><text:span text:style-name="T1">Joh 17:8</text:span></text:a><text:span text:style-name="T2"> </text:span></text:p>
          </table:table-cell>
          <table:table-cell table:style-name="Table1.A2" office:value-type="string">
            <text:p text:style-name="P1"><text:span text:style-name="T3">For I have given unto them the words which thou gavest me; and they have received</text:span> <text:span text:style-name="T5">them</text:span>, <text:span text:style-name="T3">and have known surely that I came out from thee, and they have </text:span><text:span text:style-name="T4">believed</text:span><text:span text:style-name="T3"> that thou didst send me.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Joh%2017:20" text:style-name="Internet_20_link" text:visited-style-name="Visited_20_Internet_20_Link"><text:bookmark text:name="Joh Copy 78"/><text:span text:style-name="T1">Joh 17:20</text:span></text:a><text:span text:style-name="T2"> </text:span></text:p>
          </table:table-cell>
          <table:table-cell table:style-name="Table1.A2" office:value-type="string">
            <text:p text:style-name="P1"><text:span text:style-name="T3">Neither pray I for these alone, but for them also which shall </text:span><text:span text:style-name="T4">believe</text:span><text:span text:style-name="T3"> on me through their word;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114">
          <table:table-cell table:style-name="Table1.A2" office:value-type="string">
            <text:p text:style-name="Table_20_Contents"><text:a xlink:type="simple" xlink:href="bible://AVs/Joh%2017:21" text:style-name="Internet_20_link" text:visited-style-name="Visited_20_Internet_20_Link"><text:bookmark text:name="Joh Copy 79"/><text:span text:style-name="T1">Joh 17:21</text:span></text:a><text:span text:style-name="T2"> </text:span></text:p>
          </table:table-cell>
          <table:table-cell table:style-name="Table1.A2" office:value-type="string">
            <text:p text:style-name="P1"><text:span text:style-name="T3">That they all may be one; as thou, Father,</text:span> <text:span text:style-name="T5">art</text:span> <text:span text:style-name="T3">in me, and I in thee, that they also may be one in us: that the world may </text:span><text:span text:style-name="T4">believe</text:span><text:span text:style-name="T3"> that thou hast sent me.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Joh%2019:35" text:style-name="Internet_20_link" text:visited-style-name="Visited_20_Internet_20_Link"><text:bookmark text:name="Joh Copy 80"/><text:span text:style-name="T1">Joh 19:35</text:span></text:a><text:span text:style-name="T2"> </text:span></text:p>
          </table:table-cell>
          <table:table-cell table:style-name="Table1.A2" office:value-type="string">
            <text:p text:style-name="P1">And he that saw <text:span text:style-name="T5">it</text:span> bare record, and his record is true: and he knoweth that he saith true, that ye might <text:span text:style-name="T9">believe</text:span>. </text:p>
          </table:table-cell>
          <table:table-cell table:style-name="Table1.C2" office:value-type="string">
            <text:p text:style-name="P1"/>
          </table:table-cell>
        </table:table-row>
        <table:table-row table:style-name="Table1.116">
          <table:table-cell table:style-name="Table1.A2" office:value-type="string">
            <text:p text:style-name="Table_20_Contents"><text:a xlink:type="simple" xlink:href="bible://AVs/Joh%2020:8" text:style-name="Internet_20_link" text:visited-style-name="Visited_20_Internet_20_Link"><text:bookmark text:name="Joh Copy 81"/><text:span text:style-name="T1">Joh 20:8</text:span></text:a><text:span text:style-name="T2"> </text:span></text:p>
          </table:table-cell>
          <table:table-cell table:style-name="Table1.A2" office:value-type="string">
            <text:p text:style-name="P1">Then went in also that other disciple, which came first to the sepulchre, and he saw, and <text:span text:style-name="T9">believed</text:span>.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Joh%2020:25" text:style-name="Internet_20_link" text:visited-style-name="Visited_20_Internet_20_Link"><text:bookmark text:name="Joh Copy 82"/><text:span text:style-name="T1">Joh 20:25</text:span></text:a><text:span text:style-name="T2"> </text:span></text:p>
          </table:table-cell>
          <table:table-cell table:style-name="Table1.A2" office:value-type="string">
            <text:p text:style-name="P1">The other disciples therefore said unto him, We have seen the Lord. But he said unto them, Except I shall see in his hands the print of the nails, and put my finger into the print of the nails, and thrust my hand into his side, I will not <text:span text:style-name="T9">believe</text:span>. </text:p>
          </table:table-cell>
          <table:table-cell table:style-name="Table1.C2" office:value-type="string">
            <text:p text:style-name="P1"/>
          </table:table-cell>
        </table:table-row>
        <table:table-row table:style-name="Table1.118">
          <table:table-cell table:style-name="Table1.A2" office:value-type="string">
            <text:p text:style-name="Table_20_Contents"><text:a xlink:type="simple" xlink:href="bible://AVs/Joh%2020:29" text:style-name="Internet_20_link" text:visited-style-name="Visited_20_Internet_20_Link"><text:bookmark text:name="Joh Copy 83"/><text:span text:style-name="T1">Joh 20:29</text:span></text:a><text:span text:style-name="T2"> </text:span></text:p>
          </table:table-cell>
          <table:table-cell table:style-name="Table1.A2" office:value-type="string">
            <text:p text:style-name="P1">Jesus saith unto him, <text:span text:style-name="T3">Thomas, because thou hast seen me, thou hast </text:span><text:span text:style-name="T4">believed</text:span><text:span text:style-name="T3">: blessed</text:span> <text:span text:style-name="T5">are</text:span> <text:span text:style-name="T3">they that have not seen, and</text:span> <text:span text:style-name="T5">yet</text:span> <text:span text:style-name="T3">have </text:span><text:span text:style-name="T4">believed</text:span><text:span text:style-name="T3">.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Joh%2020:31" text:style-name="Internet_20_link" text:visited-style-name="Visited_20_Internet_20_Link"><text:bookmark text:name="Joh Copy 84"/><text:span text:style-name="T1">Joh 20:31</text:span></text:a><text:span text:style-name="T2"> </text:span></text:p>
          </table:table-cell>
          <table:table-cell table:style-name="Table1.A2" office:value-type="string">
            <text:p text:style-name="P1">But these are written, that ye might <text:span text:style-name="T9">believe</text:span> that Jesus is the Christ, the Son of God; and that believing ye might have life through his name. </text:p>
          </table:table-cell>
          <table:table-cell table:style-name="Table1.C2" office:value-type="string">
            <text:p text:style-name="P1"/>
          </table:table-cell>
        </table:table-row>
      </table:table>
      <text:p text:style-name="Table_20_Contents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fo:padding="0.0201in" fo:border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2T13:49:42.679111800</meta:creation-date>
    <dc:title>default</dc:title>
    <meta:editing-duration>PT26M57S</meta:editing-duration>
    <meta:editing-cycles>20</meta:editing-cycles>
    <meta:generator>LibreOffice/26.2.4.2$Linux_X86_64 LibreOffice_project/64a984c51f4702dbd3710b13428c673a2f1292e7</meta:generator>
    <meta:initial-creator>William K. McDannell Jr.</meta:initial-creator>
    <dc:date>2026-07-11T12:31:39.868370218</dc:date>
    <meta:document-statistic meta:table-count="1" meta:image-count="0" meta:object-count="0" meta:page-count="7" meta:paragraph-count="251" meta:word-count="3113" meta:character-count="15968" meta:non-whitespace-character-count="12871"/>
    <meta:template xlink:type="simple" xlink:actuate="onRequest" xlink:title="default" xlink:href="../../../../../AppData/Roaming/LibreOffice/4/user/template/default.ott" meta:date="2025-10-12T13:49:42.219791400"/>
  </office:meta>
</office:document-meta>
</file>