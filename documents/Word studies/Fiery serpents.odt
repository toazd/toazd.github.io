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left"/>
    </style:style>
    <style:style style:name="Table1.A" style:family="table-column">
      <style:table-column-properties style:column-width="0.8333in"/>
    </style:style>
    <style:style style:name="Table1.B" style:family="table-column">
      <style:table-column-properties style:column-width="7.0667in"/>
    </style:style>
    <style:style style:name="Table1.A1" style:family="table-cell">
      <style:table-cell-properties style:vertical-align="middle" fo:padding="0.0313in" fo:border-left="0.75pt solid #000000" fo:border-right="none" fo:border-top="0.75pt solid #000000" fo:border-bottom="0.75pt solid #000000"/>
    </style:style>
    <style:style style:name="Table1.B1" style:family="table-cell">
      <style:table-cell-properties style:vertical-align="middle" fo:padding="0.0313in" fo:border="0.75pt solid #000000"/>
    </style:style>
    <style:style style:name="Table1.A2" style:family="table-cell">
      <style:table-cell-properties style:vertical-align="middle" fo:padding="0.0313in" fo:border-left="0.75pt solid #000000" fo:border-right="none" fo:border-top="none" fo:border-bottom="0.75pt solid #000000"/>
    </style:style>
    <style:style style:name="Table1.B2" style:family="table-cell">
      <style:table-cell-properties style:vertical-align="middle" fo:padding="0.0313in" fo:border-left="0.75pt solid #000000" fo:border-right="0.75pt solid #000000" fo:border-top="none" fo:border-bottom="0.75pt solid #000000"/>
    </style:style>
    <style:style style:name="Table2" style:family="table">
      <style:table-properties style:width="8.1in" table:align="margins"/>
    </style:style>
    <style:style style:name="Table2.A" style:family="table-column">
      <style:table-column-properties style:column-width="8.1in" style:rel-column-width="65535*"/>
    </style:style>
    <style:style style:name="Table2.A1" style:family="table-cell">
      <style:table-cell-properties fo:padding="0.0382in" fo:border="0.5pt solid #000000"/>
    </style:style>
    <style:style style:name="Table3" style:family="table">
      <style:table-properties style:width="8.1in" table:align="margins"/>
    </style:style>
    <style:style style:name="Table3.A" style:family="table-column">
      <style:table-column-properties style:column-width="8.1in" style:rel-column-width="65535*"/>
    </style:style>
    <style:style style:name="Table3.A1" style:family="table-cell">
      <style:table-cell-properties fo:padding="0.0382in" fo:border="0.5pt solid #000000"/>
    </style:style>
    <style:style style:name="Table4" style:family="table">
      <style:table-properties style:width="8.1021in" fo:margin-left="0in" table:align="left"/>
    </style:style>
    <style:style style:name="Table4.A" style:family="table-column">
      <style:table-column-properties style:column-width="0.8333in"/>
    </style:style>
    <style:style style:name="Table4.B" style:family="table-column">
      <style:table-column-properties style:column-width="7.2688in"/>
    </style:style>
    <style:style style:name="Table4.1" style:family="table-row">
      <style:table-row-properties fo:background-color="#efefd8">
        <style:background-image/>
      </style:table-row-properties>
    </style:style>
    <style:style style:name="Table4.A1" style:family="table-cell">
      <style:table-cell-properties style:vertical-align="middle" fo:padding="0.0201in" fo:border-left="0.05pt solid #000000" fo:border-right="none" fo:border-top="0.05pt solid #000000" fo:border-bottom="0.05pt solid #000000"/>
    </style:style>
    <style:style style:name="Table4.B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B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452e40" officeooo:paragraph-rsid="00452e40"/>
    </style:style>
    <style:style style:name="P2" style:family="paragraph" style:parent-style-name="Standard">
      <style:text-properties officeooo:rsid="0022c78e" officeooo:paragraph-rsid="0022c78e"/>
    </style:style>
    <style:style style:name="P3" style:family="paragraph" style:parent-style-name="Standard">
      <style:paragraph-properties fo:text-align="center" style:justify-single-word="false"/>
    </style:style>
    <style:style style:name="P4" style:family="paragraph" style:parent-style-name="Standard">
      <style:text-properties fo:color="#127622" loext:opacity="100%"/>
    </style:style>
    <style:style style:name="P5" style:family="paragraph" style:parent-style-name="Standard">
      <style:text-properties fo:font-style="normal" fo:font-weight="normal" officeooo:rsid="002cfc93" officeooo:paragraph-rsid="005063a1" style:font-style-asian="normal" style:font-weight-asian="normal" style:font-style-complex="normal" style:font-weight-complex="normal"/>
    </style:style>
    <style:style style:name="P6" style:family="paragraph" style:parent-style-name="Standard" style:list-style-name="L1">
      <style:text-properties officeooo:paragraph-rsid="005063a1"/>
    </style:style>
    <style:style style:name="P7" style:family="paragraph" style:parent-style-name="Standard" style:list-style-name="L1">
      <style:text-properties fo:font-style="normal" fo:font-weight="normal" officeooo:rsid="005063a1" officeooo:paragraph-rsid="005063a1"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52c00e" officeooo:paragraph-rsid="0052c00e"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53b3da" officeooo:paragraph-rsid="0053b3da"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57e52c" officeooo:paragraph-rsid="0057e52c"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54894f" officeooo:paragraph-rsid="0054894f" style:font-style-asian="normal" style:font-weight-asian="normal" style:font-style-complex="normal" style:font-weight-complex="normal"/>
    </style:style>
    <style:style style:name="P12" style:family="paragraph" style:parent-style-name="Standard" style:list-style-name="L1">
      <style:text-properties fo:font-style="normal" fo:font-weight="normal" officeooo:rsid="0054d00a" officeooo:paragraph-rsid="0054d00a" style:font-style-asian="normal" style:font-weight-asian="normal" style:font-style-complex="normal" style:font-weight-complex="normal"/>
    </style:style>
    <style:style style:name="P13" style:family="paragraph" style:parent-style-name="Standard" style:list-style-name="L1">
      <style:text-properties fo:font-style="normal" fo:font-weight="bold" officeooo:rsid="005921dd" officeooo:paragraph-rsid="005921dd" style:font-style-asian="normal" style:font-weight-asian="bold" style:font-style-complex="normal" style:font-weight-complex="bold"/>
    </style:style>
    <style:style style:name="P14" style:family="paragraph" style:parent-style-name="Standard" style:list-style-name="L1">
      <style:text-properties fo:font-style="normal" fo:font-weight="normal" officeooo:rsid="00553ac0" officeooo:paragraph-rsid="00553ac0" style:font-style-asian="normal" style:font-weight-asian="normal" style:font-style-complex="normal" style:font-weight-complex="normal"/>
    </style:style>
    <style:style style:name="P15" style:family="paragraph" style:parent-style-name="Standard" style:list-style-name="L1">
      <style:text-properties fo:font-style="normal" fo:font-weight="normal" officeooo:rsid="0055fe49" officeooo:paragraph-rsid="0055fe49" style:font-style-asian="normal" style:font-weight-asian="normal" style:font-style-complex="normal" style:font-weight-complex="normal"/>
    </style:style>
    <style:style style:name="P16" style:family="paragraph" style:parent-style-name="Standard" style:list-style-name="L1">
      <style:text-properties fo:font-style="normal" fo:font-weight="normal" officeooo:rsid="00610f9a" officeooo:paragraph-rsid="00610f9a" style:font-style-asian="normal" style:font-weight-asian="normal" style:font-style-complex="normal" style:font-weight-complex="normal"/>
    </style:style>
    <style:style style:name="P17" style:family="paragraph" style:parent-style-name="Standard">
      <style:text-properties fo:font-style="normal" fo:font-weight="normal" officeooo:rsid="00610f9a" officeooo:paragraph-rsid="00610f9a"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text-properties officeooo:paragraph-rsid="002cfc93"/>
    </style:style>
    <style:style style:name="P19" style:family="paragraph" style:parent-style-name="Standard">
      <style:text-properties fo:font-style="normal" officeooo:paragraph-rsid="002cfc93" style:font-style-asian="normal" style:font-style-complex="normal"/>
    </style:style>
    <style:style style:name="P20" style:family="paragraph" style:parent-style-name="Standard">
      <style:text-properties fo:font-style="normal" officeooo:rsid="001930c7" officeooo:paragraph-rsid="002cfc93" style:font-style-asian="normal" style:font-style-complex="normal"/>
    </style:style>
    <style:style style:name="P21" style:family="paragraph" style:parent-style-name="Standard">
      <style:text-properties officeooo:rsid="002606a1" officeooo:paragraph-rsid="008dca44"/>
    </style:style>
    <style:style style:name="P22" style:family="paragraph" style:parent-style-name="Standard">
      <style:text-properties officeooo:paragraph-rsid="008dca44"/>
    </style:style>
    <style:style style:name="P23" style:family="paragraph" style:parent-style-name="Standard" style:list-style-name="L2">
      <style:text-properties officeooo:paragraph-rsid="001602ea"/>
    </style:style>
    <style:style style:name="P24" style:family="paragraph" style:parent-style-name="Standard" style:list-style-name="L2">
      <style:text-properties officeooo:rsid="002c374d" officeooo:paragraph-rsid="002c374d"/>
    </style:style>
    <style:style style:name="P25" style:family="paragraph" style:parent-style-name="Standard" style:list-style-name="L2">
      <style:text-properties officeooo:paragraph-rsid="00334dce"/>
    </style:style>
    <style:style style:name="P26" style:family="paragraph" style:parent-style-name="Standard" style:list-style-name="L2">
      <style:text-properties fo:font-style="normal" officeooo:paragraph-rsid="002cd569" style:font-style-asian="normal" style:font-style-complex="normal"/>
    </style:style>
    <style:style style:name="P27" style:family="paragraph" style:parent-style-name="Standard" style:list-style-name="L2">
      <style:text-properties fo:font-style="normal" officeooo:rsid="008334dd" officeooo:paragraph-rsid="008334dd" style:font-style-asian="normal" style:font-style-complex="normal"/>
    </style:style>
    <style:style style:name="P28" style:family="paragraph" style:parent-style-name="Standard" style:list-style-name="L2">
      <style:text-properties fo:font-style="normal" officeooo:rsid="003750ce" officeooo:paragraph-rsid="003750ce" style:font-style-asian="normal" style:font-style-complex="normal"/>
    </style:style>
    <style:style style:name="P29" style:family="paragraph" style:parent-style-name="Standard" style:list-style-name="L2">
      <style:text-properties fo:font-style="normal" officeooo:rsid="003a92de" officeooo:paragraph-rsid="003a92de" style:font-style-asian="normal" style:font-style-complex="normal"/>
    </style:style>
    <style:style style:name="P30" style:family="paragraph" style:parent-style-name="Standard" style:list-style-name="L2">
      <style:text-properties fo:font-style="normal" officeooo:rsid="0040affa" officeooo:paragraph-rsid="0040affa" style:font-style-asian="normal" style:font-style-complex="normal"/>
    </style:style>
    <style:style style:name="P31" style:family="paragraph" style:parent-style-name="Standard" style:list-style-name="L2">
      <style:text-properties fo:font-style="normal" officeooo:rsid="00721b44" officeooo:paragraph-rsid="00815c9e" style:font-style-asian="normal" style:font-style-complex="normal"/>
    </style:style>
    <style:style style:name="P32" style:family="paragraph" style:parent-style-name="Standard">
      <style:text-properties fo:font-style="normal" officeooo:rsid="00721b44" officeooo:paragraph-rsid="00815c9e" style:font-style-asian="normal" style:font-style-complex="normal"/>
    </style:style>
    <style:style style:name="P33" style:family="paragraph" style:parent-style-name="Standard">
      <style:text-properties fo:font-style="normal" officeooo:rsid="00931b93" officeooo:paragraph-rsid="00931b93" style:font-style-asian="normal" style:font-style-complex="normal"/>
    </style:style>
    <style:style style:name="P34" style:family="paragraph" style:parent-style-name="Standard">
      <style:paragraph-properties fo:text-align="center" style:justify-single-word="false"/>
      <style:text-properties fo:font-style="normal" officeooo:rsid="00acd46f" officeooo:paragraph-rsid="00bb4c34" style:font-style-asian="normal" style:font-style-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margin-left="0in" fo:margin-right="0in" fo:text-indent="0in" style:auto-text-indent="false"/>
    </style:style>
    <style:style style:name="P37" style:family="paragraph" style:parent-style-name="Table_20_Contents">
      <style:paragraph-properties fo:margin-left="0in" fo:margin-right="0in" fo:text-indent="0in" style:auto-text-indent="false"/>
      <style:text-properties officeooo:paragraph-rsid="009d9319"/>
    </style:style>
    <style:style style:name="P38" style:family="paragraph" style:parent-style-name="Standard">
      <style:text-properties fo:font-style="normal" officeooo:rsid="00a4bc4b" officeooo:paragraph-rsid="00a4bc4b" style:font-style-asian="normal" style:font-style-complex="normal"/>
    </style:style>
    <style:style style:name="P39" style:family="paragraph" style:parent-style-name="Standard" style:list-style-name="L3">
      <style:text-properties fo:font-style="normal" officeooo:rsid="00a4bc4b" officeooo:paragraph-rsid="00a9ab81" style:font-style-asian="normal" style:font-style-complex="normal"/>
    </style:style>
    <style:style style:name="P40" style:family="paragraph" style:parent-style-name="Standard" style:list-style-name="L3">
      <style:text-properties fo:font-style="normal" officeooo:rsid="00a4bc4b" officeooo:paragraph-rsid="00a6339e" style:font-style-asian="normal" style:font-style-complex="normal"/>
    </style:style>
    <style:style style:name="P41" style:family="paragraph" style:parent-style-name="Standard" style:list-style-name="L3">
      <style:text-properties fo:font-style="normal" officeooo:rsid="00ab501a" officeooo:paragraph-rsid="00ab501a" style:font-style-asian="normal" style:font-style-complex="normal"/>
    </style:style>
    <style:style style:name="P42" style:family="paragraph" style:parent-style-name="Standard">
      <style:text-properties fo:font-style="normal" officeooo:rsid="00ab501a" officeooo:paragraph-rsid="00ab501a" style:font-style-asian="normal" style:font-style-complex="normal"/>
    </style:style>
    <style:style style:name="P43" style:family="paragraph" style:parent-style-name="Standard">
      <style:text-properties fo:font-style="normal" officeooo:rsid="00c37534" officeooo:paragraph-rsid="00c37534" style:font-style-asian="normal" style:font-style-complex="normal"/>
    </style:style>
    <style:style style:name="T1" style:family="text">
      <style:text-properties officeooo:rsid="00b0ca27"/>
    </style:style>
    <style:style style:name="T2" style:family="text">
      <style:text-properties officeooo:rsid="00b2a719"/>
    </style:style>
    <style:style style:name="T3" style:family="text">
      <style:text-properties fo:color="#127622" loext:opacity="100%" officeooo:rsid="00b2a719"/>
    </style:style>
    <style:style style:name="T4" style:family="text">
      <style:text-properties style:use-window-font-color="true" loext:opacity="0%" officeooo:rsid="00b2a719"/>
    </style:style>
    <style:style style:name="T5" style:family="text">
      <style:text-properties style:use-window-font-color="true" loext:opacity="0%" officeooo:rsid="00b606fe"/>
    </style:style>
    <style:style style:name="T6" style:family="text">
      <style:text-properties officeooo:rsid="002427f9"/>
    </style:style>
    <style:style style:name="T7" style:family="text">
      <style:text-properties officeooo:rsid="00476824"/>
    </style:style>
    <style:style style:name="T8" style:family="text">
      <style:text-properties officeooo:rsid="0048e0be"/>
    </style:style>
    <style:style style:name="T9" style:family="text">
      <style:text-properties fo:background-color="#fffb00" loext:char-shading-value="0" loext:padding="0.0193in" loext:border="0.74pt solid #d8c79d"/>
    </style:style>
    <style:style style:name="T10" style:family="text">
      <style:text-properties style:text-position="super 58%" fo:background-color="#fffb00" loext:char-shading-value="0" loext:padding="0.0193in" loext:border="0.74pt solid #d8c79d"/>
    </style:style>
    <style:style style:name="T11" style:family="text">
      <style:text-properties style:text-position="super 58%" officeooo:rsid="003ee7b6"/>
    </style:style>
    <style:style style:name="T12" style:family="text">
      <style:text-properties fo:color="#127622" loext:opacity="100%" style:text-position="super 58%" officeooo:rsid="003ee7b6"/>
    </style:style>
    <style:style style:name="T13" style:family="text">
      <style:text-properties fo:font-weight="bold" style:font-weight-asian="bold" style:font-weight-complex="bold"/>
    </style:style>
    <style:style style:name="T14" style:family="text">
      <style:text-properties officeooo:rsid="0064dfaa"/>
    </style:style>
    <style:style style:name="T15" style:family="text">
      <style:text-properties officeooo:rsid="005063a1"/>
    </style:style>
    <style:style style:name="T16" style:family="text">
      <style:text-properties officeooo:rsid="0051d9c2"/>
    </style:style>
    <style:style style:name="T17" style:family="text">
      <style:text-properties fo:font-style="normal" fo:font-weight="normal" officeooo:rsid="005063a1" style:font-style-asian="normal" style:font-weight-asian="normal" style:font-style-complex="normal" style:font-weight-complex="normal"/>
    </style:style>
    <style:style style:name="T18" style:family="text">
      <style:text-properties fo:font-style="normal" fo:font-weight="bold" officeooo:rsid="005063a1" style:font-style-asian="normal" style:font-weight-asian="bold" style:font-style-complex="normal" style:font-weight-complex="bold"/>
    </style:style>
    <style:style style:name="T19" style:family="text">
      <style:text-properties fo:font-style="normal" fo:font-weight="normal" officeooo:rsid="005acb16" style:font-style-asian="normal" style:font-weight-asian="normal" style:font-style-complex="normal" style:font-weight-complex="normal"/>
    </style:style>
    <style:style style:name="T20" style:family="text">
      <style:text-properties fo:font-style="normal" fo:font-weight="normal" officeooo:rsid="005b5540" style:font-style-asian="normal" style:font-weight-asian="normal" style:font-style-complex="normal" style:font-weight-complex="normal"/>
    </style:style>
    <style:style style:name="T21" style:family="text">
      <style:text-properties officeooo:rsid="005c5480"/>
    </style:style>
    <style:style style:name="T22" style:family="text">
      <style:text-properties officeooo:rsid="0052c00e"/>
    </style:style>
    <style:style style:name="T23" style:family="text">
      <style:text-properties fo:font-weight="bold" officeooo:rsid="0052c00e" style:font-weight-asian="bold" style:font-weight-complex="bold"/>
    </style:style>
    <style:style style:name="T24" style:family="text">
      <style:text-properties officeooo:rsid="0057e52c"/>
    </style:style>
    <style:style style:name="T25" style:family="text">
      <style:text-properties style:text-underline-style="solid" style:text-underline-width="auto" style:text-underline-color="font-color"/>
    </style:style>
    <style:style style:name="T26" style:family="text">
      <style:text-properties officeooo:rsid="007d411b"/>
    </style:style>
    <style:style style:name="T27" style:family="text">
      <style:text-properties fo:font-weight="normal" style:font-weight-asian="normal" style:font-weight-complex="normal"/>
    </style:style>
    <style:style style:name="T28" style:family="text">
      <style:text-properties officeooo:rsid="00557758"/>
    </style:style>
    <style:style style:name="T29" style:family="text">
      <style:text-properties officeooo:rsid="0066043a"/>
    </style:style>
    <style:style style:name="T30" style:family="text">
      <style:text-properties officeooo:rsid="007e992f"/>
    </style:style>
    <style:style style:name="T31" style:family="text">
      <style:text-properties officeooo:rsid="00670612"/>
    </style:style>
    <style:style style:name="T32" style:family="text">
      <style:text-properties fo:color="#127622" loext:opacity="100%" officeooo:rsid="0061c5ea"/>
    </style:style>
    <style:style style:name="T33" style:family="text">
      <style:text-properties officeooo:rsid="0061c5ea"/>
    </style:style>
    <style:style style:name="T34" style:family="text">
      <style:text-properties style:font-family-complex="'Galaxie Unicode Hebrew'" style:font-pitch-complex="variable"/>
    </style:style>
    <style:style style:name="T35" style:family="text">
      <style:text-properties officeooo:rsid="002cfc93" style:font-family-complex="'Galaxie Unicode Hebrew'" style:font-pitch-complex="variable"/>
    </style:style>
    <style:style style:name="T36" style:family="text">
      <style:text-properties officeooo:rsid="0017e561"/>
    </style:style>
    <style:style style:name="T37" style:family="text">
      <style:text-properties officeooo:rsid="0017e561" fo:background-color="#fff5ce" loext:char-shading-value="0"/>
    </style:style>
    <style:style style:name="T38" style:family="text">
      <style:text-properties fo:background-color="#fff5ce" loext:char-shading-value="0"/>
    </style:style>
    <style:style style:name="T39" style:family="text">
      <style:text-properties officeooo:rsid="0069469b"/>
    </style:style>
    <style:style style:name="T40" style:family="text">
      <style:text-properties officeooo:rsid="002cd569"/>
    </style:style>
    <style:style style:name="T41" style:family="text">
      <style:text-properties officeooo:rsid="00118691"/>
    </style:style>
    <style:style style:name="T42" style:family="text">
      <style:text-properties officeooo:rsid="006a0c60"/>
    </style:style>
    <style:style style:name="T43" style:family="text">
      <style:text-properties officeooo:rsid="00285d69"/>
    </style:style>
    <style:style style:name="T44" style:family="text">
      <style:text-properties officeooo:rsid="001602ea"/>
    </style:style>
    <style:style style:name="T45" style:family="text">
      <style:text-properties officeooo:rsid="001e5802"/>
    </style:style>
    <style:style style:name="T46" style:family="text">
      <style:text-properties officeooo:rsid="006a107d"/>
    </style:style>
    <style:style style:name="T47" style:family="text">
      <style:text-properties officeooo:rsid="0029de6e"/>
    </style:style>
    <style:style style:name="T48" style:family="text">
      <style:text-properties officeooo:rsid="002a5ea0"/>
    </style:style>
    <style:style style:name="T49" style:family="text">
      <style:text-properties officeooo:rsid="00300cc7"/>
    </style:style>
    <style:style style:name="T50" style:family="text">
      <style:text-properties officeooo:rsid="006aac39"/>
    </style:style>
    <style:style style:name="T51" style:family="text">
      <style:text-properties officeooo:rsid="00359700"/>
    </style:style>
    <style:style style:name="T52" style:family="text">
      <style:text-properties officeooo:rsid="0019628f"/>
    </style:style>
    <style:style style:name="T53" style:family="text">
      <style:text-properties style:use-window-font-color="true" loext:opacity="0%" officeooo:rsid="00161b72"/>
    </style:style>
    <style:style style:name="T54" style:family="text">
      <style:text-properties fo:color="#127622" loext:opacity="100%"/>
    </style:style>
    <style:style style:name="T55" style:family="text">
      <style:text-properties officeooo:rsid="00161b72"/>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86006a" style:font-style-asian="normal" style:font-style-complex="normal"/>
    </style:style>
    <style:style style:name="T59" style:family="text">
      <style:text-properties fo:font-style="normal" officeooo:rsid="00334dce" style:font-style-asian="normal" style:font-style-complex="normal"/>
    </style:style>
    <style:style style:name="T60" style:family="text">
      <style:text-properties fo:font-weight="bold" officeooo:rsid="002cd569" style:font-weight-asian="bold" style:font-weight-complex="bold"/>
    </style:style>
    <style:style style:name="T61" style:family="text">
      <style:text-properties officeooo:rsid="003446fc"/>
    </style:style>
    <style:style style:name="T62" style:family="text">
      <style:text-properties officeooo:rsid="0038b372"/>
    </style:style>
    <style:style style:name="T63" style:family="text">
      <style:text-properties officeooo:rsid="003a2872"/>
    </style:style>
    <style:style style:name="T64" style:family="text">
      <style:text-properties officeooo:rsid="0087eadf"/>
    </style:style>
    <style:style style:name="T65" style:family="text">
      <style:text-properties officeooo:rsid="0088bf79"/>
    </style:style>
    <style:style style:name="T66" style:family="text">
      <style:text-properties officeooo:rsid="008bccc6"/>
    </style:style>
    <style:style style:name="T67" style:family="text">
      <style:text-properties officeooo:rsid="00848cb3"/>
    </style:style>
    <style:style style:name="T68" style:family="text">
      <style:text-properties officeooo:rsid="00896974"/>
    </style:style>
    <style:style style:name="T69" style:family="text">
      <style:text-properties officeooo:rsid="0089f80c"/>
    </style:style>
    <style:style style:name="T70" style:family="text">
      <style:text-properties officeooo:rsid="008f4c3a"/>
    </style:style>
    <style:style style:name="T71" style:family="text">
      <style:text-properties officeooo:rsid="006d9c34"/>
    </style:style>
    <style:style style:name="T72" style:family="text">
      <style:text-properties officeooo:rsid="003c7f44"/>
    </style:style>
    <style:style style:name="T73" style:family="text">
      <style:text-properties officeooo:rsid="003e0348"/>
    </style:style>
    <style:style style:name="T74" style:family="text">
      <style:text-properties officeooo:rsid="006f9c30"/>
    </style:style>
    <style:style style:name="T75" style:family="text">
      <style:text-properties officeooo:rsid="0041bc3f"/>
    </style:style>
    <style:style style:name="T76" style:family="text">
      <style:text-properties officeooo:rsid="0072e5a1"/>
    </style:style>
    <style:style style:name="T77" style:family="text">
      <style:text-properties officeooo:rsid="008fb53e"/>
    </style:style>
    <style:style style:name="T78" style:family="text">
      <style:text-properties officeooo:rsid="0073bfc5"/>
    </style:style>
    <style:style style:name="T79" style:family="text">
      <style:text-properties officeooo:rsid="00787e22"/>
    </style:style>
    <style:style style:name="T80" style:family="text">
      <style:text-properties officeooo:rsid="00930c36"/>
    </style:style>
    <style:style style:name="T81" style:family="text">
      <style:text-properties officeooo:rsid="008ff87d"/>
    </style:style>
    <style:style style:name="T82" style:family="text">
      <style:text-properties officeooo:rsid="007ab2f6"/>
    </style:style>
    <style:style style:name="T83" style:family="text">
      <style:text-properties officeooo:rsid="007c7aa9"/>
    </style:style>
    <style:style style:name="T84" style:family="text">
      <style:text-properties fo:color="#127622" loext:opacity="100%" officeooo:rsid="007ab2f6"/>
    </style:style>
    <style:style style:name="T85" style:family="text">
      <style:text-properties officeooo:rsid="00acd46f"/>
    </style:style>
    <style:style style:name="T86" style:family="text">
      <style:text-properties officeooo:rsid="00ce7caf"/>
    </style:style>
    <style:style style:name="T87" style:family="text">
      <style:text-properties officeooo:rsid="00cf553f"/>
    </style:style>
    <style:style style:name="T88" style:family="text">
      <style:text-properties officeooo:rsid="00b9ac3d"/>
    </style:style>
    <style:style style:name="T89" style:family="text">
      <style:text-properties officeooo:rsid="00ae282e"/>
    </style:style>
    <style:style style:name="T90" style:family="text">
      <style:text-properties fo:font-style="italic"/>
    </style:style>
    <style:style style:name="T91" style:family="text">
      <style:text-properties fo:font-weight="bold" fo:background-color="#bdffbd" loext:char-shading-value="0"/>
    </style:style>
    <style:style style:name="T92" style:family="text">
      <style:text-properties style:text-position="super 58%" fo:font-weight="bold" officeooo:rsid="00964e9f" fo:background-color="#bdffbd" loext:char-shading-value="0"/>
    </style:style>
    <style:style style:name="T93" style:family="text">
      <style:text-properties style:text-position="super 58%" fo:font-weight="bold" officeooo:rsid="0097babe" fo:background-color="#bdffbd" loext:char-shading-value="0"/>
    </style:style>
    <style:style style:name="T94" style:family="text">
      <style:text-properties style:text-position="super 58%" officeooo:rsid="0097babe"/>
    </style:style>
    <style:style style:name="T95" style:family="text">
      <style:text-properties style:text-position="super 58%" fo:font-weight="bold" officeooo:rsid="0098d1f4" fo:background-color="#bdffbd" loext:char-shading-value="0"/>
    </style:style>
    <style:style style:name="T96" style:family="text">
      <style:text-properties style:text-position="super 58%" officeooo:rsid="0098d1f4"/>
    </style:style>
    <style:style style:name="T97" style:family="text">
      <style:text-properties style:text-position="super 58%" officeooo:rsid="0098f946"/>
    </style:style>
    <style:style style:name="T98" style:family="text">
      <style:text-properties style:text-position="super 58%" fo:font-weight="bold" officeooo:rsid="0098f946" fo:background-color="#bdffbd" loext:char-shading-value="0"/>
    </style:style>
    <style:style style:name="T99" style:family="text">
      <style:text-properties style:text-position="super 58%" officeooo:rsid="009ba693"/>
    </style:style>
    <style:style style:name="T100" style:family="text">
      <style:text-properties style:text-position="super 58%" officeooo:rsid="009a65b3"/>
    </style:style>
    <style:style style:name="T101" style:family="text">
      <style:text-properties style:text-position="super 58%" fo:font-weight="bold" officeooo:rsid="009a65b3" fo:background-color="#bdffbd" loext:char-shading-value="0"/>
    </style:style>
    <style:style style:name="T102" style:family="text">
      <style:text-properties style:text-position="super 58%" fo:font-weight="bold" officeooo:rsid="009ba693" fo:background-color="#bdffbd" loext:char-shading-value="0"/>
    </style:style>
    <style:style style:name="T103" style:family="text">
      <style:text-properties style:text-position="super 58%" officeooo:rsid="009e15b3"/>
    </style:style>
    <style:style style:name="T104" style:family="text">
      <style:text-properties style:text-position="super 58%" fo:font-weight="bold" officeooo:rsid="009e15b3" fo:background-color="#bdffbd" loext:char-shading-value="0"/>
    </style:style>
    <style:style style:name="T105" style:family="text">
      <style:text-properties style:text-position="super 58%" officeooo:rsid="009e4b4b"/>
    </style:style>
    <style:style style:name="T106" style:family="text">
      <style:text-properties style:text-position="super 58%" fo:font-weight="bold" officeooo:rsid="009e4b4b" fo:background-color="#bdffbd" loext:char-shading-value="0"/>
    </style:style>
    <style:style style:name="T107" style:family="text">
      <style:text-properties style:text-position="super 58%" officeooo:rsid="009eec5f"/>
    </style:style>
    <style:style style:name="T108" style:family="text">
      <style:text-properties style:text-position="super 58%" fo:font-weight="bold" officeooo:rsid="009eec5f" fo:background-color="#bdffbd" loext:char-shading-value="0"/>
    </style:style>
    <style:style style:name="T109" style:family="text">
      <style:text-properties style:text-position="super 58%" officeooo:rsid="009fa6aa"/>
    </style:style>
    <style:style style:name="T110" style:family="text">
      <style:text-properties style:text-position="super 58%" fo:font-weight="bold" officeooo:rsid="009fa6aa" fo:background-color="#bdffbd" loext:char-shading-value="0"/>
    </style:style>
    <style:style style:name="T111" style:family="text">
      <style:text-properties style:text-position="super 58%" fo:font-weight="bold" officeooo:rsid="00a19194" fo:background-color="#bdffbd" loext:char-shading-value="0"/>
    </style:style>
    <style:style style:name="T112" style:family="text">
      <style:text-properties style:text-position="super 58%" officeooo:rsid="00a19194"/>
    </style:style>
    <style:style style:name="T113" style:family="text">
      <style:text-properties style:text-position="super 58%" fo:font-weight="bold" officeooo:rsid="00a29957" fo:background-color="#bdffbd" loext:char-shading-value="0"/>
    </style:style>
    <style:style style:name="T114" style:family="text">
      <style:text-properties fo:font-weight="bold" fo:background-color="#fff5ce" loext:char-shading-value="0"/>
    </style:style>
    <style:style style:name="T115" style:family="text">
      <style:text-properties style:text-position="super 58%" fo:font-weight="bold" officeooo:rsid="00a3062f" fo:background-color="#fff5ce" loext:char-shading-value="0"/>
    </style:style>
    <style:style style:name="T116" style:family="text">
      <style:text-properties style:text-position="super 58%" fo:font-weight="bold" officeooo:rsid="00a402e6" fo:background-color="#bdffbd" loext:char-shading-value="0"/>
    </style:style>
    <style:style style:name="T117" style:family="text">
      <style:text-properties officeooo:rsid="00a6339e"/>
    </style:style>
    <style:style style:name="T118" style:family="text">
      <style:text-properties officeooo:rsid="00a77657"/>
    </style:style>
    <style:style style:name="T119" style:family="text">
      <style:text-properties officeooo:rsid="00a9083a"/>
    </style:style>
    <style:style style:name="T120" style:family="text">
      <style:text-properties officeooo:rsid="00c88aa1"/>
    </style:style>
    <style:style style:name="T121" style:family="text">
      <style:text-properties officeooo:rsid="00ca0a58"/>
    </style:style>
    <style:style style:name="T122" style:family="text">
      <style:text-properties officeooo:rsid="00cc823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fiery serpents” in the Bible?</text:p>
      <text:p text:style-name="Standard"/>
      <text:p text:style-name="Standard">Summary: the “fiery” adjective typically seen with the noun “serpent(s)” in the Bible seems to be primarily a d<text:span text:style-name="T1">escriptor</text:span> of the sensation caused by the bite <text:span text:style-name="T2">and not an adjective about the physical appearance of the creature itself (outside of potentially </text:span><text:span text:style-name="T3">Isa 6:2,6</text:span><text:span text:style-name="T4"> </text:span><text:span text:style-name="T5">but there is no direct connection to support that either</text:span><text:span text:style-name="T2">)</text:span>.</text:p>
      <text:p text:style-name="Standard"/>
      <text:p text:style-name="Standard"/>
      <text:p text:style-name="P2">First, let’s look at every usage of the Strong’s number(s) associated with “fiery serpent”. You may also need to review <text:span text:style-name="T6">the context of </text:span>each <text:span text:style-name="T6">usage</text:span> for more information. <text:span text:style-name="T7">The following table is an “outline of Biblical usage” for </text:span><text:span text:style-name="T8">this </text:span><text:span text:style-name="T7">particular Hebrew word which reveals to us all of the Biblical definitions of a particular word or phrase </text:span><text:span text:style-name="T8">in how they are used.</text:span></text:p>
      <text:p text:style-name="P2"/>
      <text:p text:style-name="P3">Search results for "H8314"</text:p>
      <table:table table:name="Table1" table:style-name="Table1">
        <table:table-column table:style-name="Table1.A"/>
        <table:table-column table:style-name="Table1.B"/>
        <table:table-row>
          <table:table-cell table:style-name="Table1.A1" office:value-type="string">
            <text:p text:style-name="P4">Num 21:6</text:p>
          </table:table-cell>
          <table:table-cell table:style-name="Table1.B1" office:value-type="string">
            <text:p text:style-name="Standard">And the LORD sent <text:span text:style-name="T9">fiery</text:span><text:span text:style-name="T10">H8314</text:span> serpents among the people, and they bit the people; and much people of Israel died.</text:p>
          </table:table-cell>
        </table:table-row>
        <table:table-row>
          <table:table-cell table:style-name="Table1.A2" office:value-type="string">
            <text:p text:style-name="P4">Num 21:8</text:p>
          </table:table-cell>
          <table:table-cell table:style-name="Table1.B2" office:value-type="string">
            <text:p text:style-name="Standard">And the LORD said unto Moses, Make <text:span text:style-name="T9">thee a fiery serpent</text:span><text:span text:style-name="T10">H8314</text:span>, and set it upon a pole: and it shall come to pass, that every one that is bitten, when he looketh upon it, shall live.</text:p>
          </table:table-cell>
        </table:table-row>
        <table:table-row>
          <table:table-cell table:style-name="Table1.A2" office:value-type="string">
            <text:p text:style-name="P4">Deu 8:15</text:p>
          </table:table-cell>
          <table:table-cell table:style-name="Table1.B2" office:value-type="string">
            <text:p text:style-name="Standard">Who led thee through that great and terrible wilderness<text:span text:style-name="T9">, wherein were fiery</text:span><text:span text:style-name="T10">H8314</text:span> serpents, and scorpions, and drought, where there was no water; who brought thee forth water out of the rock of flint;</text:p>
          </table:table-cell>
        </table:table-row>
        <table:table-row>
          <table:table-cell table:style-name="Table1.A2" office:value-type="string">
            <text:p text:style-name="P4">Isa 6:2</text:p>
          </table:table-cell>
          <table:table-cell table:style-name="Table1.B2" office:value-type="string">
            <text:p text:style-name="Standard">Above it stood <text:span text:style-name="T9">the seraphims</text:span><text:span text:style-name="T10">H8314</text:span>: each one had six wings; with twain he covered his face, and with twain he covered his feet, and with twain he did fly.</text:p>
          </table:table-cell>
        </table:table-row>
        <table:table-row>
          <table:table-cell table:style-name="Table1.A2" office:value-type="string">
            <text:p text:style-name="P4">Isa 6:6</text:p>
          </table:table-cell>
          <table:table-cell table:style-name="Table1.B2" office:value-type="string">
            <text:p text:style-name="Standard">Then flew one <text:span text:style-name="T9">of the seraphims</text:span><text:span text:style-name="T10">H8314</text:span> unto me, having a live coal in his hand, which he had taken with the tongs from off the altar:</text:p>
          </table:table-cell>
        </table:table-row>
        <table:table-row>
          <table:table-cell table:style-name="Table1.A2" office:value-type="string">
            <text:p text:style-name="P4">Isa 14:29</text:p>
          </table:table-cell>
          <table:table-cell table:style-name="Table1.B2" office:value-type="string">
            <text:p text:style-name="Standard">Rejoice not thou, whole Palestina, because the rod of him that smote thee is broken: for out of the serpent's root shall come forth a cockatrice<text:span text:style-name="T11">(</text:span><text:span text:style-name="T12">Jer 8:17</text:span><text:span text:style-name="T11">)</text:span>, and his fruit <text:span text:style-name="T9">shall be a fiery</text:span><text:span text:style-name="T10">H8314</text:span> flying <text:span text:style-name="T9">serpent</text:span><text:span text:style-name="T10">H8314</text:span>.</text:p>
          </table:table-cell>
        </table:table-row>
        <table:table-row>
          <table:table-cell table:style-name="Table1.A2" office:value-type="string">
            <text:p text:style-name="P4">Isa 30:6</text:p>
          </table:table-cell>
          <table:table-cell table:style-name="Table1.B2" office:value-type="string">
            <text:p text:style-name="Standard">The burden of the beasts of the south: into the land of trouble and anguish, from whence come the young and old lion, the viper <text:span text:style-name="T9">and fiery</text:span><text:span text:style-name="T10">H8314</text:span> flying <text:span text:style-name="T9">serpent</text:span><text:span text:style-name="T10">H8314</text:span>, they will carry their riches upon the shoulders of young asses, and their treasures upon the bunches of camels, to a people that shall not profit them.</text:p>
          </table:table-cell>
        </table:table-row>
      </table:table>
      <text:p text:style-name="Standard"/>
      <text:p text:style-name="P5">Note that “seraph<text:span text:style-name="T13">im</text:span>” is the plural of “seraph”. An “im” suffix in the Bible is often, <text:span text:style-name="T14">but</text:span> not always, an indicator of a plurality<text:span text:style-name="T15"> </text:span><text:span text:style-name="T16">and is sometimes, but not always, accompanied with an “s” suffix</text:span><text:span text:style-name="T15">:</text:span></text:p>
      <text:list text:style-name="L1">
        <text:list-item>
          <text:p text:style-name="P6"><text:span text:style-name="T17">Eloh</text:span><text:span text:style-name="T18">im</text:span><text:span text:style-name="T17"> (Hebrew </text:span><text:span text:style-name="T19">name for the Godhead: </text:span><text:span text:style-name="T20">The Father, the Son, and the Holy Ghost</text:span><text:span text:style-name="T17">)</text:span></text:p>
        </text:list-item>
        <text:list-item>
          <text:p text:style-name="P7">Anak<text:span text:style-name="T13">im</text:span>s (children of Anak), <text:span text:style-name="T21">E</text:span><text:span text:style-name="T22">m</text:span><text:span text:style-name="T23">im</text:span><text:span text:style-name="T22">s, </text:span><text:span text:style-name="T21">and the </text:span><text:span text:style-name="T22">Hor</text:span><text:span text:style-name="T23">im</text:span><text:span text:style-name="T22">s</text:span></text:p>
        </text:list-item>
        <text:list-item>
          <text:p text:style-name="P8">Philist<text:span text:style-name="T13">im</text:span> (Philistines)</text:p>
        </text:list-item>
        <text:list-item>
          <text:p text:style-name="P9"><text:span text:style-name="T24">D</text:span>escendants of Mizra<text:span text:style-name="T25">im</text:span> <text:span text:style-name="T26">(probably only a man’s name, not plural) </text:span>[Egyptians] the son of Ham:</text:p>
          <text:list>
            <text:list-item>
              <text:p text:style-name="P10">Lud<text:span text:style-name="T13">im</text:span>/Lydians</text:p>
            </text:list-item>
            <text:list-item>
              <text:p text:style-name="P11">Naphtuh<text:span text:style-name="T13">im</text:span></text:p>
            </text:list-item>
            <text:list-item>
              <text:p text:style-name="P12">Anam<text:span text:style-name="T13">im</text:span></text:p>
            </text:list-item>
            <text:list-item>
              <text:p text:style-name="P13"><text:span text:style-name="T27">Lehab</text:span>im</text:p>
            </text:list-item>
          </text:list>
        </text:list-item>
        <text:list-item>
          <text:p text:style-name="P14">Lub<text:span text:style-name="T13">im</text:span>s (descendants of Put/<text:span text:style-name="T28">Phut</text:span> the son of Ham; <text:span text:style-name="T28">AKA Libyans</text:span>)</text:p>
        </text:list-item>
        <text:list-item>
          <text:p text:style-name="P15">Dodan<text:span text:style-name="T13">im</text:span> (descendants of Javan [Grecia/Greece] the son of Japheth)</text:p>
        </text:list-item>
        <text:list-item>
          <text:p text:style-name="P16">Valley of Charash<text:span text:style-name="T13">im</text:span> (<text:span text:style-name="T29">valley of</text:span> <text:span text:style-name="T30">[</text:span><text:span text:style-name="T31">plural</text:span><text:span text:style-name="T30">]</text:span><text:span text:style-name="T31"> </text:span>craftsman; <text:span text:style-name="T32">1Ch 4:14</text:span><text:span text:style-name="T33">, </text:span><text:span text:style-name="T32">Neh 11:35</text:span>)</text:p>
        </text:list-item>
      </text:list>
      <text:p text:style-name="P17"/>
      <text:p text:style-name="P17"/>
      <text:p text:style-name="P17"/>
      <text:p text:style-name="P17"/>
      <table:table table:name="Table2" table:style-name="Table2">
        <table:table-column table:style-name="Table2.A"/>
        <text:soft-page-break/>
        <table:table-row>
          <table:table-cell table:style-name="Table2.A1" office:value-type="string">
            <text:p text:style-name="P18">H8314 <text:span text:style-name="T34">שָׂרָף</text:span></text:p>
            <text:p text:style-name="P18"><text:span text:style-name="T35">Pronunciation: </text:span><text:span text:style-name="T13">sârâph</text:span> | saw-rawf'</text:p>
            <text:p text:style-name="P18">Derivation: from שָׂרַף; <text:span text:style-name="T36">(</text:span><text:span text:style-name="T37">H8313</text:span><text:span text:style-name="T36">)</text:span></text:p>
            <text:p text:style-name="P18">Strong's: burning, i.e. (figuratively) poisonous (serpent); specifically, a saraph or symbolical creature (from their copper color)</text:p>
            <text:p text:style-name="P18">KJV: fiery (serpent), seraph.</text:p>
          </table:table-cell>
        </table:table-row>
      </table:table>
      <table:table table:name="Table3" table:style-name="Table3">
        <table:table-column table:style-name="Table3.A"/>
        <table:table-row>
          <table:table-cell table:style-name="Table3.A1" office:value-type="string">
            <text:p text:style-name="P18"><text:span text:style-name="T38">H8313 </text:span><text:span text:style-name="T34">שָׂרַף</text:span></text:p>
            <text:p text:style-name="P18"><text:span text:style-name="T35">Pronunciation: </text:span><text:span text:style-name="T13">sâraph</text:span> | saw-raf'</text:p>
            <text:p text:style-name="P18">Derivation: a primitive root;</text:p>
            <text:p text:style-name="P18">Strong's: to be (causatively, set) on fire</text:p>
            <text:p text:style-name="P18">KJV: (cause to, make a) burn((-ing), up) kindle, [idiom] utterly.</text:p>
          </table:table-cell>
        </table:table-row>
      </table:table>
      <text:p text:style-name="P19"/>
      <text:p text:style-name="P20">H8313 appears 117 times in the King James Bible and 112 times (or 96%) of those are one of the following: burn (39), burned (33), burneth (4), burnt (36).</text:p>
      <text:p text:style-name="P20"/>
      <text:p text:style-name="P21">A search on the world wide web for “which venomous snake bites create a burning sensation and are native to Israel and the Sinai peninsula” reveals the following:</text:p>
      <text:p text:style-name="P22"/>
      <text:p text:style-name="P22"><text:span text:style-name="T39">T</text:span><text:span text:style-name="T40">h</text:span><text:span text:style-name="T41">ere are </text:span><text:span text:style-name="T40">only </text:span><text:span text:style-name="T41">two </text:span><text:span text:style-name="T42">known </text:span><text:span text:style-name="T41">species of snakes native to Israel </text:span><text:span text:style-name="T43">and the </text:span><text:span text:style-name="T41">Sinai Peninsula whose venom causes </text:span><text:span text:style-name="T44">an</text:span><text:span text:style-name="T41"> intense burning sensation by </text:span>activat<text:span text:style-name="T41">ing</text:span> the TRPV1 pain receptors in humans <text:span text:style-name="T45">(</text:span><text:span text:style-name="T41">that is also activated by temperatures over </text:span>43°C, <text:span text:style-name="T41">capsaicin, acidic pH, and inflammatory mediators such as cytokines, prostaglandins, histamine, kinins, and leukotrienes).</text:span></text:p>
      <text:p text:style-name="Standard"/>
      <text:p text:style-name="Standard">One of those snake species is called the “Painted saw-scaled viper” (<text:a xlink:type="simple" xlink:href="https://en.wikipedia.org/wiki/Echis_coloratus" text:style-name="Internet_20_link" text:visited-style-name="Visited_20_Internet_20_Link">Echis coloratus</text:a>) but the other which is called the “Israeli mole viper” (<text:a xlink:type="simple" xlink:href="https://en.wikipedia.org/wiki/Atractaspis_engaddensis" text:style-name="Internet_20_link" text:visited-style-name="Visited_20_Internet_20_Link">Atractaspis engaddensis</text:a>) is of particular interest because of <text:span text:style-name="T46">the following:</text:span></text:p>
      <text:list text:style-name="L2">
        <text:list-item>
          <text:p text:style-name="P23">It’s <text:span text:style-name="T47">modern </text:span>Hebrew name is "<text:span text:style-name="T13">Saraf</text:span> Ein Gedi" <text:span text:style-name="T36">(see </text:span><text:span text:style-name="T48">definitions for </text:span><text:span text:style-name="T36">H8314 </text:span><text:span text:style-name="T48">and H8313 </text:span><text:span text:style-name="T49">above</text:span><text:span text:style-name="T36">).</text:span></text:p>
          <text:list>
            <text:list-item>
              <text:p text:style-name="P24">The modern <text:span text:style-name="T50">Hebrew </text:span>definition of “Saraf” is “burning or venomous serpent”.</text:p>
            </text:list-item>
          </text:list>
        </text:list-item>
        <text:list-item>
          <text:p text:style-name="P23"><text:span text:style-name="T51">Even at high concentrations i</text:span>t’s venom <text:span text:style-name="T25">does not</text:span> block contractions of skeletal muscles: <text:span text:style-name="T44">In other words, after being bitten, you are still able to move your neck muscles and </text:span><text:span text:style-name="T52">for example</text:span><text:span text:style-name="T44"> … look at a brass serpent on a pole.</text:span></text:p>
          <text:list>
            <text:list-item>
              <text:p text:style-name="P25"><text:span text:style-name="T53">In God’s instructions in </text:span><text:span text:style-name="T54">Numbers 21:9</text:span> the person <text:span text:style-name="T55">was </text:span>to look at the brass serpent <text:span text:style-name="T56">after</text:span><text:span text:style-name="T57"> they were bitten. This would not </text:span><text:span text:style-name="T58">normally </text:span><text:span text:style-name="T57">be possible if the venom interfered with or prevented muscle movement </text:span><text:span text:style-name="T59">(which is typical for highly venomous snake bites).</text:span></text:p>
            </text:list-item>
          </text:list>
        </text:list-item>
        <text:list-item>
          <text:p text:style-name="P26"><text:span text:style-name="T40">It is categorized as having “</text:span><text:span text:style-name="T60">very high</text:span><text:span text:style-name="T40"> lethal potency” with an </text:span><text:span text:style-name="T61">i.</text:span><text:span text:style-name="T40">v. LD50 of 0.06-0.075 micro-grams per gram of body weight in mice. </text:span><text:span text:style-name="T62">The venom’s </text:span><text:span text:style-name="T63">varied and </text:span><text:span text:style-name="T62">nasty effects begin </text:span><text:a xlink:type="simple" xlink:href="https://pubmed.ncbi.nlm.nih.gov/9920494/" text:style-name="Internet_20_link" text:visited-style-name="Visited_20_Internet_20_Link"><text:span text:style-name="T62">within minutes</text:span></text:a><text:span text:style-name="T62"> in humans.</text:span></text:p>
          <text:list>
            <text:list-item>
              <text:p text:style-name="P27"><text:span text:style-name="T64">It’s venom</text:span> is 29 times more potent then a member of the same family <text:span text:style-name="T65">the Dahomey burrowing asp </text:span>(<text:a xlink:type="simple" xlink:href="https://en.wikipedia.org/wiki/Atractaspis_dahomeyensis" text:style-name="Internet_20_link" text:visited-style-name="Visited_20_Internet_20_Link">Atractaspis dahomeyensis</text:a>) <text:span text:style-name="T66">a</text:span><text:span text:style-name="T67">nd 36 to 45 times more potent than the </text:span><text:a xlink:type="simple" xlink:href="https://en.wikipedia.org/wiki/Western_diamondback_rattlesnake" text:style-name="Internet_20_link" text:visited-style-name="Visited_20_Internet_20_Link"><text:span text:style-name="T67">western diamondback rattlesnake</text:span></text:a><text:span text:style-name="T67"> </text:span><text:span text:style-name="T68">on the low</text:span><text:span text:style-name="T69">est</text:span><text:span text:style-name="T68"> end </text:span><text:span text:style-name="T70">(intravenous injection).</text:span></text:p>
            </text:list-item>
          </text:list>
        </text:list-item>
        <text:list-item>
          <text:p text:style-name="P28">There is currently <text:span text:style-name="T13">no antivenom</text:span> available for this snake<text:span text:style-name="T71">s venom.</text:span></text:p>
        </text:list-item>
        <text:list-item>
          <text:p text:style-name="P29">We are still unsure of exactly how the venom kills a person <text:span text:style-name="T72">(“seemingly [from] neurotoxic effects”) </text:span>and <text:span text:style-name="T73">reports of </text:span>people surviving bites are actually more common than reports of deaths <text:span text:style-name="T73">(apparently due to </text:span><text:span text:style-name="T74">those being reported having </text:span><text:span text:style-name="T73">the fangs of the snake not penetrating deep enough into </text:span><text:span text:style-name="T74">the skin</text:span><text:span text:style-name="T73">)</text:span>.</text:p>
        </text:list-item>
        <text:list-item>
          <text:p text:style-name="P30">In an <text:a xlink:type="simple" xlink:href="https://www.kolhair.co.il/health/104912/" text:style-name="Internet_20_link" text:visited-style-name="Visited_20_Internet_20_Link">Israeli news article from 2022-08-19</text:a> it is described as “He is the most venomous snake in Israel”.</text:p>
          <text:list>
            <text:list-item>
              <text:p text:style-name="P30">The heart of the 3 year old that was bitten stopped beating, <text:span text:style-name="T75">among other complications, and needless to say without swift medical assistance she would have quickly died.</text:span></text:p>
            </text:list-item>
          </text:list>
        </text:list-item>
        <text:list-item>
          <text:p text:style-name="P31"><text:span text:style-name="T76">Based on the evidence, i</text:span>f the snake gets a <text:span text:style-name="T76">good, deep</text:span> bite on you, and someone isn’t around to keep your heart pumping you <text:span text:style-name="T77">would</text:span> likely die within minutes <text:span text:style-name="T76">(you will </text:span><text:span text:style-name="T78">very likely </text:span><text:span text:style-name="T76">be unconscious within minutes regardless).</text:span></text:p>
        </text:list-item>
      </text:list>
      <text:p text:style-name="P32"/>
      <text:p text:style-name="P32"><text:span text:style-name="T79">Without CPR </text:span><text:span text:style-name="T80">and other </text:span><text:span text:style-name="T79">methods of restarting the heart, chemical injections, and machine assistance there is no defense against the deadly venom – except if God intervenes. </text:span><text:span text:style-name="T81">Putting all of this together this species s</text:span><text:span text:style-name="T82">eems </text:span><text:span text:style-name="T81">to be </text:span><text:span text:style-name="T82">a very likely candidate for the same species </text:span><text:span text:style-name="T83">of serpent that we read about </text:span><text:span text:style-name="T82">in </text:span><text:span text:style-name="T84">Numbers 21</text:span><text:span text:style-name="T82">.</text:span></text:p>
      <text:p text:style-name="P32"/>
      <text:p text:style-name="P33"><text:soft-page-break/>References to “fiery” in the Bible that indicate a fire as in a flame are not <text:span text:style-name="T85">ever </text:span><text:span text:style-name="T86">directly </text:span>associated with H8314 <text:span text:style-name="T86">and there is no </text:span><text:span text:style-name="T87">other </text:span><text:span text:style-name="T86">direct connection that would indicate to us that is what is meant</text:span>:</text:p>
      <text:p text:style-name="P33"/>
      <text:p text:style-name="P34">Search results for “fiery” sans H8314</text:p>
      <text:p text:style-name="P34">(<text:span text:style-name="T88">looking for </text:span>back-references/<text:span text:style-name="T89">reciprocals</text:span> to H8314)</text:p>
      <table:table table:name="Table4" table:style-name="Table4">
        <table:table-column table:style-name="Table4.A"/>
        <table:table-column table:style-name="Table4.B"/>
        <table:table-row table:style-name="Table4.1">
          <table:table-cell table:style-name="Table4.A1" office:value-type="string">
            <text:p text:style-name="P35">Deu 33:2</text:p>
          </table:table-cell>
          <table:table-cell table:style-name="Table4.B1" office:value-type="string">
            <text:p text:style-name="P36">And he said, The LORD came from Sinai, and rose up from Seir unto them; he shined forth from mount Paran, and he came with ten thousands of saints: from his right hand <text:span text:style-name="T90">went</text:span> a <text:span text:style-name="T91">fiery</text:span><text:span text:style-name="T92">H799 H784</text:span> law for them.</text:p>
          </table:table-cell>
        </table:table-row>
        <table:table-row>
          <table:table-cell table:style-name="Table4.A2" office:value-type="string">
            <text:p text:style-name="P35">Psa 21:9</text:p>
          </table:table-cell>
          <table:table-cell table:style-name="Table4.B2" office:value-type="string">
            <text:p text:style-name="P36">Thou shalt make them as a <text:span text:style-name="T91">fiery</text:span><text:span text:style-name="T93">H784</text:span> oven<text:span text:style-name="T94">H8574</text:span> in the time of thine anger: the LORD shall swallow them up in his wrath, and the fire shall devour them.</text:p>
          </table:table-cell>
        </table:table-row>
        <table:table-row table:style-name="Table4.1">
          <table:table-cell table:style-name="Table4.A2" office:value-type="string">
            <text:p text:style-name="P35">Dan 3:6</text:p>
          </table:table-cell>
          <table:table-cell table:style-name="Table4.B2" office:value-type="string">
            <text:p text:style-name="P36">And whoso falleth not down and worshippeth shall the same hour be cast into the midst of a burning <text:span text:style-name="T91">fiery</text:span><text:span text:style-name="T95">H5135</text:span> furnace<text:span text:style-name="T96">H861</text:span>.</text:p>
          </table:table-cell>
        </table:table-row>
        <table:table-row>
          <table:table-cell table:style-name="Table4.A2" office:value-type="string">
            <text:p text:style-name="P35">Dan 3:11</text:p>
          </table:table-cell>
          <table:table-cell table:style-name="Table4.B2" office:value-type="string">
            <text:p text:style-name="P37">And whoso falleth not down and worshippeth, <text:span text:style-name="T90">that</text:span> he should be cast into the midst of a burning<text:span text:style-name="T97">H3345</text:span> <text:span text:style-name="T91">fiery</text:span><text:span text:style-name="T98">H5135</text:span> furnace<text:span text:style-name="T99">H861</text:span>.</text:p>
          </table:table-cell>
        </table:table-row>
        <table:table-row table:style-name="Table4.1">
          <table:table-cell table:style-name="Table4.A2" office:value-type="string">
            <text:p text:style-name="P35">Dan 3:15</text:p>
          </table:table-cell>
          <table:table-cell table:style-name="Table4.B2" office:value-type="string">
            <text:p text:style-name="P37">Now if ye be ready that at what time ye hear the sound of the cornet, flute, harp, sackbut, psaltery, and dulcimer, and all kinds of musick, ye fall down and worship the image which I have made; <text:span text:style-name="T90">well</text:span>: but if ye worship not, ye shall be cast the same hour into the midst of a burning<text:span text:style-name="T100">H3345</text:span> <text:span text:style-name="T91">fiery</text:span><text:span text:style-name="T101">H5135</text:span> furnace<text:span text:style-name="T99">H861</text:span>; and who <text:span text:style-name="T90">is</text:span> that God that shall deliver you out of my hands?</text:p>
          </table:table-cell>
        </table:table-row>
        <table:table-row>
          <table:table-cell table:style-name="Table4.A2" office:value-type="string">
            <text:p text:style-name="P35">Dan 3:17</text:p>
          </table:table-cell>
          <table:table-cell table:style-name="Table4.B2" office:value-type="string">
            <text:p text:style-name="P36">If it be <text:span text:style-name="T90">so</text:span>, our God whom we serve is able to deliver us from the burning<text:span text:style-name="T99">H3345</text:span> <text:span text:style-name="T91">fiery</text:span><text:span text:style-name="T102">H5135</text:span> furnace<text:span text:style-name="T99">H861</text:span>, and he will deliver <text:span text:style-name="T90">us</text:span> out of thine hand, O king.</text:p>
          </table:table-cell>
        </table:table-row>
        <table:table-row table:style-name="Table4.1">
          <table:table-cell table:style-name="Table4.A2" office:value-type="string">
            <text:p text:style-name="P35">Dan 3:20</text:p>
          </table:table-cell>
          <table:table-cell table:style-name="Table4.B2" office:value-type="string">
            <text:p text:style-name="P36">And he commanded the most mighty men that <text:span text:style-name="T90">were</text:span> in his army to bind Shadrach, Meshach, and Abed-nego, <text:span text:style-name="T90">and</text:span> to cast <text:span text:style-name="T90">them</text:span> into the burning<text:span text:style-name="T103">H3345</text:span> <text:span text:style-name="T91">fiery</text:span><text:span text:style-name="T104">H5135</text:span> furnace<text:span text:style-name="T103">H861</text:span>.</text:p>
          </table:table-cell>
        </table:table-row>
        <table:table-row>
          <table:table-cell table:style-name="Table4.A2" office:value-type="string">
            <text:p text:style-name="P35">Dan 3:21</text:p>
          </table:table-cell>
          <table:table-cell table:style-name="Table4.B2" office:value-type="string">
            <text:p text:style-name="P36">Then these men were bound in their coats, their hosen, and their hats, and their <text:span text:style-name="T90">other</text:span> garments, and were cast into the midst of the burning<text:span text:style-name="T105">H3345</text:span> <text:span text:style-name="T91">fiery</text:span><text:span text:style-name="T106">H5135</text:span> furnace<text:span text:style-name="T105">H861</text:span>.</text:p>
          </table:table-cell>
        </table:table-row>
        <table:table-row table:style-name="Table4.1">
          <table:table-cell table:style-name="Table4.A2" office:value-type="string">
            <text:p text:style-name="P35">Dan 3:23</text:p>
          </table:table-cell>
          <table:table-cell table:style-name="Table4.B2" office:value-type="string">
            <text:p text:style-name="P36">And these three men, Shadrach, Meshach, and Abed-nego, fell down bound into the midst of the burning<text:span text:style-name="T107">H3345</text:span> <text:span text:style-name="T91">fiery</text:span><text:span text:style-name="T108">H5135</text:span> furnace<text:span text:style-name="T107">H861</text:span>.</text:p>
          </table:table-cell>
        </table:table-row>
        <table:table-row>
          <table:table-cell table:style-name="Table4.A2" office:value-type="string">
            <text:p text:style-name="P35">Dan 3:26</text:p>
          </table:table-cell>
          <table:table-cell table:style-name="Table4.B2" office:value-type="string">
            <text:p text:style-name="P36">¶ Then Nebuchadnezzar came near to the mouth of the burning<text:span text:style-name="T109">H3345</text:span> <text:span text:style-name="T91">fiery</text:span><text:span text:style-name="T110">H5135</text:span> furnace<text:span text:style-name="T109">H861</text:span>, <text:span text:style-name="T90">and</text:span> spake, and said, Shadrach, Meshach, and Abed-nego, ye servants of the most high God, come forth, and come <text:span text:style-name="T90">hither</text:span>. Then Shadrach, Meshach, and Abed-nego, came forth of the midst of the fire.</text:p>
          </table:table-cell>
        </table:table-row>
        <table:table-row table:style-name="Table4.1">
          <table:table-cell table:style-name="Table4.A2" office:value-type="string">
            <text:p text:style-name="P35">Dan 7:9</text:p>
          </table:table-cell>
          <table:table-cell table:style-name="Table4.B2" office:value-type="string">
            <text:p text:style-name="P36">¶ I beheld till the thrones were cast down, and the Ancient of days did sit, whose garment <text:span text:style-name="T90">was</text:span> white as snow, and the hair of his head like the pure wool: his throne <text:span text:style-name="T90">was like</text:span> the <text:span text:style-name="T91">fiery</text:span><text:span text:style-name="T111">H5135</text:span> flame<text:span text:style-name="T112">H7631</text:span>, <text:span text:style-name="T90">and</text:span> his wheels <text:span text:style-name="T90">as</text:span> burning<text:span text:style-name="T112">H1815</text:span> fire<text:span text:style-name="T112">H5135</text:span>.</text:p>
          </table:table-cell>
        </table:table-row>
        <table:table-row>
          <table:table-cell table:style-name="Table4.A2" office:value-type="string">
            <text:p text:style-name="P35">Dan 7:10</text:p>
          </table:table-cell>
          <table:table-cell table:style-name="Table4.B2" office:value-type="string">
            <text:p text:style-name="P36">A <text:span text:style-name="T91">fiery</text:span><text:span text:style-name="T113">H5135</text:span> stream issued and came forth from before him: thousand thousands ministered unto him, and ten thousand times ten thousand stood before him: the judgment was set, and the books were opened.</text:p>
          </table:table-cell>
        </table:table-row>
        <table:table-row table:style-name="Table4.1">
          <table:table-cell table:style-name="Table4.A2" office:value-type="string">
            <text:p text:style-name="P35">Eph 6:16</text:p>
          </table:table-cell>
          <table:table-cell table:style-name="Table4.B2" office:value-type="string">
            <text:p text:style-name="P36">Above all, taking the shield of faith, wherewith ye shall be able to quench all the <text:span text:style-name="T91">fiery</text:span><text:span text:style-name="T113">G4448</text:span> darts of the wicked.</text:p>
          </table:table-cell>
        </table:table-row>
        <table:table-row>
          <table:table-cell table:style-name="Table4.A2" office:value-type="string">
            <text:p text:style-name="P35">Heb 10:27</text:p>
          </table:table-cell>
          <table:table-cell table:style-name="Table4.B2" office:value-type="string">
            <text:p text:style-name="P36">But a certain fearful looking for of judgment and <text:span text:style-name="T114">fiery</text:span><text:span text:style-name="T115">G4442</text:span> indignation, which shall devour the adversaries.</text:p>
          </table:table-cell>
        </table:table-row>
        <table:table-row table:style-name="Table4.1">
          <table:table-cell table:style-name="Table4.A2" office:value-type="string">
            <text:p text:style-name="P35">1Pe 4:12</text:p>
          </table:table-cell>
          <table:table-cell table:style-name="Table4.B2" office:value-type="string">
            <text:p text:style-name="P36">Beloved, think it not strange concerning the <text:span text:style-name="T91">fiery</text:span><text:span text:style-name="T116">G4451</text:span> trial which is to try you, as though some strange thing happened unto you:</text:p>
          </table:table-cell>
        </table:table-row>
      </table:table>
      <text:p text:style-name="P38"/>
      <text:list text:style-name="L3">
        <text:list-item>
          <text:p text:style-name="P39">Hebrew equivalents to <text:span text:style-name="T38">G4442</text:span>:</text:p>
          <text:list>
            <text:list-item>
              <text:p text:style-name="P39">H217, H784, H1200, H3827, H3852, H5135, H7565, <text:span text:style-name="T38">H8316</text:span></text:p>
            </text:list-item>
          </text:list>
        </text:list-item>
        <text:list-item>
          <text:p text:style-name="P40">G44<text:span text:style-name="T117">51 </text:span><text:span text:style-name="T118">is derived from H3925 (</text:span><text:span text:style-name="T119">diligently, expert, instruct(ed), learn, skilful, taught, teach(ers|est|eth|ing)</text:span></text:p>
        </text:list-item>
        <text:list-item>
          <text:p text:style-name="P39">Hebrew equivalents to G4442:</text:p>
          <text:list>
            <text:list-item>
              <text:p text:style-name="P41">H119, H977, H6884, H8443</text:p>
            </text:list-item>
          </text:list>
        </text:list-item>
      </text:list>
      <text:p text:style-name="P42"/>
      <text:p text:style-name="P43">H8316 <text:span text:style-name="T120">(burnt, burned, burning) </text:span>is <text:span text:style-name="T121">also </text:span>derived from <text:span text:style-name="T121">the same root word </text:span>H8313 (the same root <text:span text:style-name="T121">word </text:span>for H8314). <text:span text:style-name="T121">This does not indicate an equivalent connection but it is merely one way to search for those that might exist. </text:span>Other than that, no other back-references exist <text:span text:style-name="T122">(significant or otherwi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6T15:15:27.325036400</meta:creation-date>
    <dc:title>default</dc:title>
    <meta:editing-duration>PT3H50M9S</meta:editing-duration>
    <meta:editing-cycles>186</meta:editing-cycles>
    <meta:generator>LibreOffice/25.8.1.1$Windows_X86_64 LibreOffice_project/54047653041915e595ad4e45cccea684809c77b5</meta:generator>
    <dc:date>2025-09-06T19:07:05.820451600</dc:date>
    <meta:print-date>2025-09-06T19:04:19.069650400</meta:print-date>
    <meta:printed-by>PDF files</meta:printed-by>
    <meta:document-statistic meta:table-count="4" meta:image-count="0" meta:object-count="0" meta:page-count="3" meta:paragraph-count="95" meta:word-count="1716" meta:character-count="9934" meta:non-whitespace-character-count="8339"/>
    <meta:template xlink:type="simple" xlink:actuate="onRequest" xlink:title="default" xlink:href="../../../../../AppData/Roaming/LibreOffice/4/user/template/default.ott" meta:date="2025-09-06T15:15:27.043525600"/>
  </office:meta>
</office:document-meta>
</file>