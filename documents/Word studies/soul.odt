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14" style:family="table">
      <style:table-properties style:width="7.9in" table:align="margins"/>
    </style:style>
    <style:style style:name="Table14.A" style:family="table-column">
      <style:table-column-properties style:column-width="7.9in" style:rel-column-width="65535*"/>
    </style:style>
    <style:style style:name="Table14.A1" style:family="table-cell">
      <style:table-cell-properties fo:padding="0.0382in" fo:border="0.5pt solid #000000"/>
    </style:style>
    <style:style style:name="Table15" style:family="table">
      <style:table-properties style:width="7.9in" table:align="margins"/>
    </style:style>
    <style:style style:name="Table15.A" style:family="table-column">
      <style:table-column-properties style:column-width="7.9in" style:rel-column-width="65535*"/>
    </style:style>
    <style:style style:name="Table15.A1" style:family="table-cell">
      <style:table-cell-properties fo:padding="0.0382in" fo:border="0.5pt solid #000000"/>
    </style:style>
    <style:style style:name="Table16" style:family="table">
      <style:table-properties style:width="7.9in" table:align="margins"/>
    </style:style>
    <style:style style:name="Table16.A" style:family="table-column">
      <style:table-column-properties style:column-width="7.9in" style:rel-column-width="65535*"/>
    </style:style>
    <style:style style:name="Table16.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11" style:family="table">
      <style:table-properties style:width="7.9in" table:align="margins"/>
    </style:style>
    <style:style style:name="Table11.A" style:family="table-column">
      <style:table-column-properties style:column-width="7.9in" style:rel-column-width="65535*"/>
    </style:style>
    <style:style style:name="Table11.A1" style:family="table-cell">
      <style:table-cell-properties fo:padding="0.0382in" fo:border="0.5pt solid #000000"/>
    </style:style>
    <style:style style:name="Table12" style:family="table">
      <style:table-properties style:width="7.9in" table:align="margins"/>
    </style:style>
    <style:style style:name="Table12.A" style:family="table-column">
      <style:table-column-properties style:column-width="7.9in" style:rel-column-width="65535*"/>
    </style:style>
    <style:style style:name="Table12.A1" style:family="table-cell">
      <style:table-cell-properties fo:padding="0.0382in" fo:border="0.5pt solid #000000"/>
    </style:style>
    <style:style style:name="Table13" style:family="table">
      <style:table-properties style:width="7.9in" table:align="margins"/>
    </style:style>
    <style:style style:name="Table13.A" style:family="table-column">
      <style:table-column-properties style:column-width="1.3167in" style:rel-column-width="10922*"/>
    </style:style>
    <style:style style:name="Table13.B" style:family="table-column">
      <style:table-column-properties style:column-width="1.3167in" style:rel-column-width="10923*"/>
    </style:style>
    <style:style style:name="Table13.C" style:family="table-column">
      <style:table-column-properties style:column-width="1.3167in" style:rel-column-width="10924*"/>
    </style:style>
    <style:style style:name="Table13.F" style:family="table-column">
      <style:table-column-properties style:column-width="1.3167in" style:rel-column-width="10921*"/>
    </style:style>
    <style:style style:name="Table13.1" style:family="table-row">
      <style:table-row-properties fo:keep-together="always"/>
    </style:style>
    <style:style style:name="Table13.A1" style:family="table-cell">
      <style:table-cell-properties fo:padding="0.0382in" fo:border-left="0.5pt solid #000000" fo:border-right="none" fo:border-top="0.5pt solid #000000" fo:border-bottom="0.5pt solid #000000"/>
    </style:style>
    <style:style style:name="Table13.F1" style:family="table-cell">
      <style:table-cell-properties fo:padding="0.0382in" fo:border="0.5pt solid #000000"/>
    </style:style>
    <style:style style:name="Table17" style:family="table">
      <style:table-properties style:width="7.9in" table:align="margins"/>
    </style:style>
    <style:style style:name="Table17.A" style:family="table-column">
      <style:table-column-properties style:column-width="7.9in" style:rel-column-width="65535*"/>
    </style:style>
    <style:style style:name="Table17.A1" style:family="table-cell">
      <style:table-cell-properties fo:padding="0.0382in" fo:border="0.5pt solid #000000"/>
    </style:style>
    <style:style style:name="Table18" style:family="table">
      <style:table-properties style:width="7.9in" table:align="margins"/>
    </style:style>
    <style:style style:name="Table18.A" style:family="table-column">
      <style:table-column-properties style:column-width="7.9in" style:rel-column-width="65535*"/>
    </style:style>
    <style:style style:name="Table18.A1" style:family="table-cell">
      <style:table-cell-properties fo:padding="0.0382in" fo:border="0.5pt solid #000000"/>
    </style:style>
    <style:style style:name="Table19" style:family="table">
      <style:table-properties style:width="7.9in" table:align="margins"/>
    </style:style>
    <style:style style:name="Table19.A" style:family="table-column">
      <style:table-column-properties style:column-width="7.9in" style:rel-column-width="65535*"/>
    </style:style>
    <style:style style:name="Table19.A1" style:family="table-cell">
      <style:table-cell-properties fo:padding="0.0382in" fo:border="0.5pt solid #000000"/>
    </style:style>
    <style:style style:name="Table20" style:family="table">
      <style:table-properties style:width="7.9in" table:align="margins"/>
    </style:style>
    <style:style style:name="Table20.A" style:family="table-column">
      <style:table-column-properties style:column-width="7.9in" style:rel-column-width="65535*"/>
    </style:style>
    <style:style style:name="Table20.1" style:family="table-row">
      <style:table-row-properties fo:keep-together="always"/>
    </style:style>
    <style:style style:name="Table20.A1" style:family="table-cell">
      <style:table-cell-properties fo:padding="0.0382in" fo:border="0.5pt solid #000000"/>
    </style:style>
    <style:style style:name="Table21" style:family="table">
      <style:table-properties style:width="7.9in" table:align="margins"/>
    </style:style>
    <style:style style:name="Table21.A" style:family="table-column">
      <style:table-column-properties style:column-width="7.9in" style:rel-column-width="65535*"/>
    </style:style>
    <style:style style:name="Table21.A1" style:family="table-cell">
      <style:table-cell-properties fo:padding="0.0382in" fo:border="0.5pt solid #000000"/>
    </style:style>
    <style:style style:name="Table22" style:family="table">
      <style:table-properties style:width="7.9in" table:align="margins"/>
    </style:style>
    <style:style style:name="Table22.A" style:family="table-column">
      <style:table-column-properties style:column-width="7.9in" style:rel-column-width="65535*"/>
    </style:style>
    <style:style style:name="Table22.A1" style:family="table-cell">
      <style:table-cell-properties fo:padding="0.0382in" fo:border="0.5pt solid #000000"/>
    </style:style>
    <style:style style:name="Table23" style:family="table">
      <style:table-properties style:width="7.9in" table:align="margins"/>
    </style:style>
    <style:style style:name="Table23.A" style:family="table-column">
      <style:table-column-properties style:column-width="7.9in" style:rel-column-width="65535*"/>
    </style:style>
    <style:style style:name="Table23.A1" style:family="table-cell">
      <style:table-cell-properties fo:padding="0.0382in" fo:border="0.5pt solid #000000"/>
    </style:style>
    <style:style style:name="Table24" style:family="table">
      <style:table-properties style:width="7.9in" table:align="margins"/>
    </style:style>
    <style:style style:name="Table24.A" style:family="table-column">
      <style:table-column-properties style:column-width="7.9in" style:rel-column-width="65535*"/>
    </style:style>
    <style:style style:name="Table24.A1" style:family="table-cell">
      <style:table-cell-properties fo:padding="0.0382in" fo:border="0.5pt solid #000000"/>
    </style:style>
    <style:style style:name="P1" style:family="paragraph" style:parent-style-name="Table_20_Contents" style:list-style-name="L1">
      <style:text-properties officeooo:rsid="001a5cdb" officeooo:paragraph-rsid="001a5cdb"/>
    </style:style>
    <style:style style:name="P2" style:family="paragraph" style:parent-style-name="Table_20_Contents" style:list-style-name="L1">
      <style:text-properties officeooo:rsid="001c1a32" officeooo:paragraph-rsid="001c1a32"/>
    </style:style>
    <style:style style:name="P3" style:family="paragraph" style:parent-style-name="Table_20_Contents">
      <style:text-properties officeooo:rsid="001c1a32" officeooo:paragraph-rsid="001c1a32"/>
    </style:style>
    <style:style style:name="P4" style:family="paragraph" style:parent-style-name="Table_20_Contents" style:list-style-name="L2">
      <style:text-properties officeooo:rsid="001d9f12" officeooo:paragraph-rsid="001d9f12"/>
    </style:style>
    <style:style style:name="P5" style:family="paragraph" style:parent-style-name="Table_20_Contents">
      <style:text-properties fo:color="#127622" loext:opacity="100%" officeooo:paragraph-rsid="0049ab96"/>
    </style:style>
    <style:style style:name="P6" style:family="paragraph" style:parent-style-name="Table_20_Contents">
      <style:text-properties officeooo:paragraph-rsid="0049ab96"/>
    </style:style>
    <style:style style:name="P7" style:family="paragraph" style:parent-style-name="Table_20_Contents">
      <style:text-properties officeooo:paragraph-rsid="0013445c"/>
    </style:style>
    <style:style style:name="P8" style:family="paragraph" style:parent-style-name="Table_20_Contents" style:list-style-name="L3">
      <style:text-properties officeooo:rsid="0016d913" officeooo:paragraph-rsid="0016d913"/>
    </style:style>
    <style:style style:name="P9" style:family="paragraph" style:parent-style-name="Table_20_Contents">
      <style:text-properties fo:color="#127622" loext:opacity="100%" officeooo:paragraph-rsid="00128411"/>
    </style:style>
    <style:style style:name="P10" style:family="paragraph" style:parent-style-name="Table_20_Contents">
      <style:text-properties officeooo:paragraph-rsid="00128411"/>
    </style:style>
    <style:style style:name="P11" style:family="paragraph" style:parent-style-name="Table_20_Contents">
      <style:text-properties officeooo:paragraph-rsid="001f36d2"/>
    </style:style>
    <style:style style:name="P12" style:family="paragraph" style:parent-style-name="Table_20_Contents" style:list-style-name="L4">
      <style:text-properties officeooo:rsid="00250e77" officeooo:paragraph-rsid="00250e77"/>
    </style:style>
    <style:style style:name="P13" style:family="paragraph" style:parent-style-name="Table_20_Contents">
      <style:text-properties officeooo:rsid="00250e77" officeooo:paragraph-rsid="00250e77"/>
    </style:style>
    <style:style style:name="P14" style:family="paragraph" style:parent-style-name="Table_20_Contents">
      <style:text-properties officeooo:paragraph-rsid="0025f1b9"/>
    </style:style>
    <style:style style:name="P15" style:family="paragraph" style:parent-style-name="Table_20_Contents" style:list-style-name="L5">
      <style:text-properties officeooo:rsid="0027699a" officeooo:paragraph-rsid="0027699a"/>
    </style:style>
    <style:style style:name="P16" style:family="paragraph" style:parent-style-name="Table_20_Contents">
      <style:text-properties officeooo:rsid="0027699a" officeooo:paragraph-rsid="0027699a"/>
    </style:style>
    <style:style style:name="P17" style:family="paragraph" style:parent-style-name="Table_20_Contents">
      <style:text-properties officeooo:paragraph-rsid="0029ebd2"/>
    </style:style>
    <style:style style:name="P18" style:family="paragraph" style:parent-style-name="Table_20_Contents">
      <style:text-properties officeooo:paragraph-rsid="002af325"/>
    </style:style>
    <style:style style:name="P19" style:family="paragraph" style:parent-style-name="Table_20_Contents" style:list-style-name="L6">
      <style:text-properties officeooo:rsid="002d468d" officeooo:paragraph-rsid="002d468d"/>
    </style:style>
    <style:style style:name="P20" style:family="paragraph" style:parent-style-name="Table_20_Contents">
      <style:text-properties officeooo:rsid="002d468d" officeooo:paragraph-rsid="002d468d"/>
    </style:style>
    <style:style style:name="P21" style:family="paragraph" style:parent-style-name="Table_20_Contents" style:list-style-name="L7">
      <style:text-properties officeooo:rsid="00346257" officeooo:paragraph-rsid="00346257"/>
    </style:style>
    <style:style style:name="P22" style:family="paragraph" style:parent-style-name="Table_20_Contents" style:list-style-name="L7">
      <style:text-properties officeooo:rsid="0055d1bf" officeooo:paragraph-rsid="0055d1bf"/>
    </style:style>
    <style:style style:name="P23" style:family="paragraph" style:parent-style-name="Table_20_Contents">
      <style:text-properties officeooo:rsid="00346257" officeooo:paragraph-rsid="00346257"/>
    </style:style>
    <style:style style:name="P24" style:family="paragraph" style:parent-style-name="Table_20_Contents">
      <style:text-properties fo:color="#127622" loext:opacity="100%"/>
    </style:style>
    <style:style style:name="P25" style:family="paragraph" style:parent-style-name="Table_20_Contents" style:list-style-name="L8">
      <style:text-properties officeooo:rsid="003675c6" officeooo:paragraph-rsid="003675c6"/>
    </style:style>
    <style:style style:name="P26" style:family="paragraph" style:parent-style-name="Table_20_Contents">
      <style:text-properties officeooo:rsid="003675c6" officeooo:paragraph-rsid="003675c6"/>
    </style:style>
    <style:style style:name="P27" style:family="paragraph" style:parent-style-name="Table_20_Contents" style:list-style-name="L9">
      <style:text-properties officeooo:rsid="0036d498" officeooo:paragraph-rsid="0036d498"/>
    </style:style>
    <style:style style:name="P28" style:family="paragraph" style:parent-style-name="Table_20_Contents" style:list-style-name="L9">
      <style:text-properties officeooo:rsid="00388c17" officeooo:paragraph-rsid="00388c17"/>
    </style:style>
    <style:style style:name="P29" style:family="paragraph" style:parent-style-name="Table_20_Contents">
      <style:text-properties officeooo:rsid="00388c17" officeooo:paragraph-rsid="00388c17"/>
    </style:style>
    <style:style style:name="P30" style:family="paragraph" style:parent-style-name="Table_20_Contents">
      <style:text-properties fo:color="#127622" loext:opacity="100%" officeooo:paragraph-rsid="0039b032"/>
    </style:style>
    <style:style style:name="P31" style:family="paragraph" style:parent-style-name="Table_20_Contents">
      <style:text-properties fo:color="#ff0000" loext:opacity="100%" officeooo:paragraph-rsid="0039b032"/>
    </style:style>
    <style:style style:name="P32" style:family="paragraph" style:parent-style-name="Table_20_Contents">
      <style:text-properties fo:color="#127622" loext:opacity="100%" officeooo:paragraph-rsid="003e22fb"/>
    </style:style>
    <style:style style:name="P33" style:family="paragraph" style:parent-style-name="Table_20_Contents">
      <style:text-properties fo:color="#127622" loext:opacity="100%" officeooo:paragraph-rsid="00405865"/>
    </style:style>
    <style:style style:name="P34" style:family="paragraph" style:parent-style-name="Table_20_Contents">
      <style:text-properties officeooo:paragraph-rsid="00405865"/>
    </style:style>
    <style:style style:name="P35" style:family="paragraph" style:parent-style-name="Table_20_Contents">
      <style:text-properties officeooo:paragraph-rsid="004b8425"/>
    </style:style>
    <style:style style:name="P36" style:family="paragraph" style:parent-style-name="Table_20_Contents">
      <style:text-properties officeooo:paragraph-rsid="004c1275"/>
    </style:style>
    <style:style style:name="P37" style:family="paragraph" style:parent-style-name="Table_20_Contents">
      <style:text-properties officeooo:paragraph-rsid="004dea78"/>
    </style:style>
    <style:style style:name="P38" style:family="paragraph" style:parent-style-name="Table_20_Contents">
      <style:text-properties officeooo:paragraph-rsid="0053587e"/>
    </style:style>
    <style:style style:name="P39" style:family="paragraph" style:parent-style-name="Table_20_Contents">
      <style:text-properties officeooo:paragraph-rsid="005a1ecd"/>
    </style:style>
    <style:style style:name="P40" style:family="paragraph" style:parent-style-name="Table_20_Contents" style:list-style-name="L10">
      <style:text-properties officeooo:rsid="005a1ecd" officeooo:paragraph-rsid="005a1ecd"/>
    </style:style>
    <style:style style:name="T1" style:family="text">
      <style:text-properties fo:color="#127622" loext:opacity="100%"/>
    </style:style>
    <style:style style:name="T2" style:family="text">
      <style:text-properties fo:background-color="#fff5ce" loext:char-shading-value="0"/>
    </style:style>
    <style:style style:name="T3" style:family="text">
      <style:text-properties fo:background-color="#ffdbb6" loext:char-shading-value="0"/>
    </style:style>
    <style:style style:name="T4" style:family="text">
      <style:text-properties fo:background-color="#ffe994" loext:char-shading-value="0"/>
    </style:style>
    <style:style style:name="T5" style:family="text">
      <style:text-properties officeooo:rsid="001cfd7e"/>
    </style:style>
    <style:style style:name="T6" style:family="text">
      <style:text-properties officeooo:rsid="001c1a32"/>
    </style:style>
    <style:style style:name="T7" style:family="text">
      <style:text-properties style:text-position="33% 80%"/>
    </style:style>
    <style:style style:name="T8" style:family="text">
      <style:text-properties officeooo:rsid="002919e1"/>
    </style:style>
    <style:style style:name="T9" style:family="text">
      <style:text-properties officeooo:rsid="00128411"/>
    </style:style>
    <style:style style:name="T10" style:family="text">
      <style:text-properties fo:background-color="#ffffd7" loext:char-shading-value="0"/>
    </style:style>
    <style:style style:name="T11" style:family="text">
      <style:text-properties fo:color="#ff0000" loext:opacity="100%"/>
    </style:style>
    <style:style style:name="T12" style:family="text">
      <style:text-properties fo:color="#ff0000" loext:opacity="100%" fo:background-color="#fff5ce" loext:char-shading-value="0"/>
    </style:style>
    <style:style style:name="T13" style:family="text">
      <style:text-properties officeooo:rsid="005723ff"/>
    </style:style>
    <style:style style:name="T14" style:family="text">
      <style:text-properties officeooo:rsid="00350c60"/>
    </style:style>
    <style:style style:name="T15" style:family="text">
      <style:text-properties fo:background-color="transparent" loext:char-shading-value="0"/>
    </style:style>
    <style:style style:name="T16" style:family="text">
      <style:text-properties fo:color="#ff0000" loext:opacity="100%" fo:background-color="transparent" loext:char-shading-value="0"/>
    </style:style>
    <style:style style:name="T17" style:family="text">
      <style:text-properties fo:background-color="#ffff00"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able_20_Contents"/>
      <table:table table:name="Table3" table:style-name="Table3">
        <table:table-column table:style-name="Table3.A"/>
        <table:table-row>
          <table:table-cell table:style-name="Table3.A1" office:value-type="string">
            <text:p text:style-name="Table_20_Contents"><text:span text:style-name="T1">Genesis 2:7</text:span><text:line-break/>And the LORD God formed man of <text:span text:style-name="T2">the dust of the ground</text:span>, and breathed into his nostrils <text:span text:style-name="T3">the breath of life</text:span>; and man became a <text:span text:style-name="T4">living soul</text:span>.</text:p>
          </table:table-cell>
        </table:table-row>
      </table:table>
      <text:list text:style-name="L1">
        <text:list-item>
          <text:p text:style-name="P1">When Adam was created <text:span text:style-name="T5">(before the fall) </text:span><text:span text:style-name="T6">he was made of two parts:</text:span></text:p>
          <text:list>
            <text:list-item>
              <text:p text:style-name="P2">The dust of the ground (flesh)</text:p>
            </text:list-item>
            <text:list-item>
              <text:p text:style-name="P2">The breath of life (spirit)</text:p>
            </text:list-item>
          </text:list>
        </text:list-item>
      </text:list>
      <text:p text:style-name="P3"/>
      <table:table table:name="Table5" table:style-name="Table5">
        <table:table-column table:style-name="Table5.A"/>
        <table:table-row>
          <table:table-cell table:style-name="Table5.A1" office:value-type="string">
            <text:p text:style-name="Table_20_Contents"><text:span text:style-name="T1">Ecclesiastes 12:7</text:span><text:line-break/>Then shall the dust return to the earth as it was: and the spirit shall return unto God who gave it.</text:p>
          </table:table-cell>
        </table:table-row>
      </table:table>
      <text:list text:style-name="L2">
        <text:list-item>
          <text:p text:style-name="P4">When a person dies their flesh returns to the earth and the spirit returns to God who gave it (<text:span text:style-name="T1">Hebrew 9:27</text:span>).</text:p>
        </text:list-item>
      </text:list>
      <text:p text:style-name="Table_20_Contents"/>
      <table:table table:name="Table14" table:style-name="Table14">
        <table:table-column table:style-name="Table14.A"/>
        <table:table-row>
          <table:table-cell table:style-name="Table14.A1" office:value-type="string">
            <text:p text:style-name="Table_20_Contents"><text:span text:style-name="T1">Luke 23:46</text:span><text:line-break/>And when Jesus had cried with a loud voice, he said, Father, into thy hands I commend <text:span text:style-name="T2">my spirit</text:span>: and having said thus, he gave up the ghost.</text:p>
          </table:table-cell>
        </table:table-row>
      </table:table>
      <text:p text:style-name="Table_20_Contents"/>
      <table:table table:name="Table15" table:style-name="Table15">
        <table:table-column table:style-name="Table15.A"/>
        <table:table-row>
          <table:table-cell table:style-name="Table15.A1" office:value-type="string">
            <text:p text:style-name="Table_20_Contents"><text:span text:style-name="T1">Psalms 16:10</text:span><text:line-break/>For thou wilt not leave my <text:span text:style-name="T2">soul</text:span> in hell; neither wilt thou suffer thine Holy One to see corruption.</text:p>
            <text:p text:style-name="Table_20_Contents"/>
            <text:p text:style-name="Table_20_Contents"><text:span text:style-name="T1">Acts 2:27</text:span><text:line-break/>Because thou wilt not leave my <text:span text:style-name="T2">soul</text:span> in hell, neither wilt thou suffer thine Holy One to see corruption.</text:p>
          </table:table-cell>
        </table:table-row>
      </table:table>
      <text:p text:style-name="Table_20_Contents"/>
      <table:table table:name="Table16" table:style-name="Table16">
        <table:table-column table:style-name="Table16.A"/>
        <table:table-row>
          <table:table-cell table:style-name="Table16.A1" office:value-type="string">
            <text:p text:style-name="P5">Genesis 35:17-18</text:p>
            <text:p text:style-name="P6"><text:span text:style-name="T7">17</text:span> And it came to pass, when she was in hard labour, that the midwife said unto her, Fear not; thou shalt have this son also.</text:p>
            <text:p text:style-name="P6"><text:span text:style-name="T7">18</text:span> And it came to pass, as her <text:span text:style-name="T2">soul</text:span> was in departing, (for she died) that she called his name Benoni: but his father called him Benjamin.</text:p>
          </table:table-cell>
        </table:table-row>
      </table:table>
      <text:p text:style-name="Table_20_Contents"/>
      <text:p text:style-name="Table_20_Contents"/>
      <table:table table:name="Table2" table:style-name="Table2">
        <table:table-column table:style-name="Table2.A"/>
        <table:table-row>
          <table:table-cell table:style-name="Table2.A1" office:value-type="string">
            <text:p text:style-name="P7"><text:span text:style-name="T1">Leviticus 5:1-4</text:span><text:line-break/><text:span text:style-name="T7">1</text:span> And if a soul <text:span text:style-name="T2">sin</text:span>, and <text:span text:style-name="T2">hear</text:span> the voice of swearing, and is a <text:span text:style-name="T2">witness</text:span>, whether he hath <text:span text:style-name="T2">seen</text:span> or <text:span text:style-name="T2">known</text:span> of it; if he do not <text:span text:style-name="T2">utter</text:span> it, then he shall bear his iniquity.</text:p>
            <text:p text:style-name="P7"><text:span text:style-name="T7">2</text:span> Or if a soul <text:span text:style-name="T2">touch</text:span> any unclean thing, whether it be a carcase of an unclean beast, or a carcase of unclean cattle, or the carcase of unclean creeping things, and if it be hidden from him; he also shall be unclean, and guilty.</text:p>
            <text:p text:style-name="P7"><text:span text:style-name="T7">3</text:span> Or if he <text:span text:style-name="T2">touch</text:span> the uncleanness of man, whatsoever uncleanness it be that a man shall be defiled withal, and it be hid from him; when he <text:span text:style-name="T2">knoweth</text:span> of it, then he shall be guilty.</text:p>
            <text:p text:style-name="P7"><text:span text:style-name="T7">4</text:span> Or if a soul <text:span text:style-name="T2">swear</text:span>, pronouncing with his <text:span text:style-name="T2">lips</text:span> to do evil, or to do good, whatsoever it be that a man shall pronounce with an oath, and it be hid from him; when he knoweth of it, then he shall be guilty in one of these.</text:p>
          </table:table-cell>
        </table:table-row>
      </table:table>
      <text:list text:style-name="L3">
        <text:list-item>
          <text:p text:style-name="P8">A soul can <text:span text:style-name="T8">sin,</text:span> hear, see, speak, touch, and know things.</text:p>
        </text:list-item>
      </text:list>
      <text:p text:style-name="Table_20_Contents"/>
      <table:table table:name="Table1" table:style-name="Table1">
        <table:table-column table:style-name="Table1.A"/>
        <table:table-row>
          <table:table-cell table:style-name="Table1.A1" office:value-type="string">
            <text:p text:style-name="P9"><text:span text:style-name="T9">1Thessalonians 5:</text:span>23</text:p>
            <text:p text:style-name="P10">And the very God of peace sanctify you wholly; and I pray God your whole <text:span text:style-name="T2">spirit</text:span> and <text:span text:style-name="T10">soul</text:span> and <text:span text:style-name="T3">body</text:span> be preserved blameless unto the coming of our Lord Jesus Christ.</text:p>
          </table:table-cell>
        </table:table-row>
      </table:table>
      <text:p text:style-name="Table_20_Contents"><text:soft-page-break/></text:p>
      <text:p text:style-name="Table_20_Contents"/>
      <table:table table:name="Table4" table:style-name="Table4">
        <table:table-column table:style-name="Table4.A"/>
        <table:table-row>
          <table:table-cell table:style-name="Table4.A1" office:value-type="string">
            <text:p text:style-name="P11"><text:span text:style-name="T1">Luke 16:19-31</text:span><text:line-break/><text:span text:style-name="T7">19</text:span> <text:span text:style-name="T11">There was a certain rich man, which was clothed in purple and fine linen, and fared sumptuously every day:</text:span></text:p>
            <text:p text:style-name="P11"><text:span text:style-name="T7">20</text:span> <text:span text:style-name="T11">And there was a certain beggar named Lazarus, which was laid at his gate, full of sores,</text:span></text:p>
            <text:p text:style-name="P11"><text:span text:style-name="T7">21</text:span> <text:span text:style-name="T11">And desiring to be fed with the crumbs which fell from the rich man's table: moreover the dogs came and licked his sores.</text:span></text:p>
            <text:p text:style-name="P11"><text:span text:style-name="T7">22</text:span> <text:span text:style-name="T11">And it came to pass, that the beggar died, and was carried by the angels into Abraham's bosom: the rich man also died, and was buried;</text:span></text:p>
            <text:p text:style-name="P11"><text:span text:style-name="T7">23</text:span> <text:span text:style-name="T11">And in hell he lift up his </text:span><text:span text:style-name="T12">eyes</text:span><text:span text:style-name="T11">, being in torments, and </text:span><text:span text:style-name="T12">seeth</text:span><text:span text:style-name="T11"> Abraham afar off, and Lazarus in his bosom.</text:span></text:p>
            <text:p text:style-name="P11"><text:span text:style-name="T7">24</text:span> <text:span text:style-name="T11">And he </text:span><text:span text:style-name="T12">cried</text:span><text:span text:style-name="T11"> and </text:span><text:span text:style-name="T12">said</text:span><text:span text:style-name="T11">, Father Abraham, have mercy on me, and send Lazarus, that he may dip the tip of his </text:span><text:span text:style-name="T12">finger</text:span><text:span text:style-name="T11"> in water, and cool my </text:span><text:span text:style-name="T12">tongue</text:span><text:span text:style-name="T11">; for I am </text:span><text:span text:style-name="T12">tormented</text:span><text:span text:style-name="T11"> in this flame.</text:span></text:p>
            <text:p text:style-name="P11"><text:span text:style-name="T7">25</text:span> <text:span text:style-name="T11">But Abraham said, Son, </text:span><text:span text:style-name="T12">remember</text:span><text:span text:style-name="T11"> that thou in thy lifetime receivedst thy good things, and likewise Lazarus evil things: but now he is </text:span><text:span text:style-name="T12">comforted</text:span><text:span text:style-name="T11">, and thou art tormented.</text:span></text:p>
            <text:p text:style-name="P11"><text:span text:style-name="T7">26</text:span> <text:span text:style-name="T11">And beside all this, between us and you there is a great gulf fixed: so that they which would </text:span><text:span text:style-name="T12">pass</text:span><text:span text:style-name="T11"> from hence to you cannot; neither can they </text:span><text:span text:style-name="T12">pass</text:span><text:span text:style-name="T11"> to us, that would come from thence.</text:span></text:p>
            <text:p text:style-name="P11"><text:span text:style-name="T7">27</text:span> <text:span text:style-name="T11">Then he said, I pray thee therefore, father, that thou wouldest send him to my father's house:</text:span></text:p>
            <text:p text:style-name="P11"><text:span text:style-name="T7">28</text:span> <text:span text:style-name="T11">For I have five brethren; that he may testify unto them, lest they also come into this place of torment.</text:span></text:p>
            <text:p text:style-name="P11"><text:span text:style-name="T7">29</text:span> <text:span text:style-name="T11">Abraham saith unto him, They have Moses and the prophets; let them hear them.</text:span></text:p>
            <text:p text:style-name="P11"><text:span text:style-name="T7">30</text:span> <text:span text:style-name="T11">And he said, Nay, father Abraham: but if one went unto them from the dead, they will repent.</text:span></text:p>
            <text:p text:style-name="P11"><text:span text:style-name="T7">31</text:span> <text:span text:style-name="T11">And he said unto him, If they hear not Moses and the prophets, neither will they be persuaded, though one rose from the dead.</text:span></text:p>
          </table:table-cell>
        </table:table-row>
      </table:table>
      <text:list text:style-name="L4">
        <text:list-item>
          <text:p text:style-name="P12">Eyes (see), cried/said (mouth), finger (touch), tongue (mouth), comforted/tormented (feel?), pass (walk?)</text:p>
        </text:list-item>
      </text:list>
      <text:p text:style-name="P13"/>
      <text:p text:style-name="P13"/>
      <table:table table:name="Table6" table:style-name="Table6">
        <table:table-column table:style-name="Table6.A"/>
        <table:table-row>
          <table:table-cell table:style-name="Table6.A1" office:value-type="string">
            <text:p text:style-name="P14"><text:span text:style-name="T1">Revelation 6:9-11</text:span><text:line-break/><text:span text:style-name="T7">9</text:span> And when he had opened the fifth seal, I saw under the altar the souls of them that were slain for the word of God, and for the testimony which they held:</text:p>
            <text:p text:style-name="P14"><text:span text:style-name="T7">10</text:span> And they <text:span text:style-name="T2">cried</text:span> with a loud <text:span text:style-name="T2">voice</text:span>, saying, How long, O Lord, holy and true, dost thou not judge and avenge our blood on them that dwell on the earth?</text:p>
            <text:p text:style-name="P14"><text:span text:style-name="T7">11</text:span> And <text:span text:style-name="T2">white robes were given unto every one of them</text:span>; and it was said unto them, that they should rest yet for a little season, until their fellowservants also and their brethren, that should be killed as they were, should be fulfilled.</text:p>
          </table:table-cell>
        </table:table-row>
      </table:table>
      <text:list text:style-name="L5">
        <text:list-item>
          <text:p text:style-name="P15">Voice</text:p>
        </text:list-item>
        <text:list-item>
          <text:p text:style-name="P15">White robes cover a body</text:p>
        </text:list-item>
      </text:list>
      <text:p text:style-name="P16"/>
      <text:p text:style-name="P16"/>
      <table:table table:name="Table7" table:style-name="Table7">
        <table:table-column table:style-name="Table7.A"/>
        <table:table-row>
          <table:table-cell table:style-name="Table7.A1" office:value-type="string">
            <text:p text:style-name="P17"><text:span text:style-name="T1">Mark 7:15-23</text:span><text:line-break/><text:span text:style-name="T7">15</text:span> <text:span text:style-name="T11">There is nothing from without a man, that entering into him can defile him: but the things which come out of him, those are they that defile the man.</text:span></text:p>
            <text:p text:style-name="P17"><text:span text:style-name="T7">16</text:span> <text:span text:style-name="T11">If any man have ears to hear, let him hear.</text:span></text:p>
            <text:p text:style-name="P17"><text:span text:style-name="T7">17</text:span> And when he was entered into the house from the people, his disciples asked him concerning the parable.</text:p>
            <text:p text:style-name="P17"><text:span text:style-name="T7">18</text:span> And he saith unto them, <text:span text:style-name="T11">Are ye so without understanding also? Do ye not perceive, that whatsoever thing from without entereth into the man, it cannot defile him;</text:span></text:p>
            <text:p text:style-name="P18"><text:soft-page-break/><text:span text:style-name="T7">19</text:span> <text:span text:style-name="T11">Because it entereth not into his heart, but into the belly, and goeth out into the draught, purging all meats?</text:span></text:p>
            <text:p text:style-name="P18"><text:span text:style-name="T7">20</text:span> And he said, <text:span text:style-name="T11">That which cometh out of the man, that defileth the man.</text:span></text:p>
            <text:p text:style-name="P17"><text:span text:style-name="T7">21</text:span> <text:span text:style-name="T11">For from within, out of the </text:span><text:span text:style-name="T12">heart</text:span><text:span text:style-name="T11"> of men, proceed evil thoughts, adulteries, fornications, murders,</text:span></text:p>
            <text:p text:style-name="P17"><text:span text:style-name="T7">22</text:span> <text:span text:style-name="T11">Thefts, covetousness, wickedness, deceit, lasciviousness, an evil eye, blasphemy, pride, foolishness:</text:span></text:p>
            <text:p text:style-name="P17"><text:span text:style-name="T7">23</text:span> <text:span text:style-name="T11">All these evil things come from within, and defile the man.</text:span></text:p>
          </table:table-cell>
        </table:table-row>
      </table:table>
      <text:list text:style-name="L6">
        <text:list-item>
          <text:p text:style-name="P19">All these evil things from from the heart (mind?) of man.</text:p>
        </text:list-item>
      </text:list>
      <text:p text:style-name="P20"/>
      <table:table table:name="Table8" table:style-name="Table8">
        <table:table-column table:style-name="Table8.A"/>
        <table:table-row>
          <table:table-cell table:style-name="Table8.A1" office:value-type="string">
            <text:p text:style-name="Table_20_Contents"><text:span text:style-name="T1">Proverbs 4:23</text:span><text:line-break/>Keep thy <text:span text:style-name="T2">heart with all diligence</text:span>; for out of it are the issues of life.</text:p>
          </table:table-cell>
        </table:table-row>
      </table:table>
      <text:p text:style-name="P20"/>
      <table:table table:name="Table9" table:style-name="Table9">
        <table:table-column table:style-name="Table9.A"/>
        <table:table-row>
          <table:table-cell table:style-name="Table9.A1" office:value-type="string">
            <text:p text:style-name="Table_20_Contents"><text:span text:style-name="T1">Deuteronomy 4:9</text:span><text:line-break/>Only take heed to thyself, and keep thy <text:span text:style-name="T2">soul diligently</text:span>, lest thou forget the things which thine eyes have seen, and lest they depart from thy <text:span text:style-name="T2">heart</text:span> all the days of thy life: but teach them thy sons, and thy sons' sons;</text:p>
          </table:table-cell>
        </table:table-row>
      </table:table>
      <text:p text:style-name="P20"/>
      <table:table table:name="Table10" table:style-name="Table10">
        <table:table-column table:style-name="Table10.A"/>
        <table:table-row>
          <table:table-cell table:style-name="Table10.A1" office:value-type="string">
            <text:p text:style-name="Table_20_Contents"><text:span text:style-name="T1">Hebrews 4:12</text:span><text:line-break/>For the word of God is quick, and powerful, and sharper than any twoedged sword, piercing even to the <text:span text:style-name="T2">dividing asunder of soul and spirit</text:span>, and <text:span text:style-name="T3">of the joints and marrow</text:span>, and is a discerner of the <text:span text:style-name="T3">thoughts</text:span> and <text:span text:style-name="T3">intents</text:span> of the <text:span text:style-name="T3">heart</text:span>.</text:p>
          </table:table-cell>
        </table:table-row>
      </table:table>
      <text:list text:style-name="L7">
        <text:list-item>
          <text:p text:style-name="P21">Soul, spirit, and flesh (joins and marrow).</text:p>
        </text:list-item>
        <text:list-item>
          <text:p text:style-name="P21">The “heart” has “thoughts and intents” (mind).</text:p>
        </text:list-item>
        <text:list-item>
          <text:p text:style-name="P22">+Col 2:10-13 = circumcision (the operation of God) <text:span text:style-name="T13">between (soul and spirit) and (body or flesh).</text:span></text:p>
        </text:list-item>
      </text:list>
      <text:p text:style-name="P23"/>
      <text:p text:style-name="P23"/>
      <table:table table:name="Table11" table:style-name="Table11">
        <table:table-column table:style-name="Table11.A"/>
        <table:table-row>
          <table:table-cell table:style-name="Table11.A1" office:value-type="string">
            <text:p text:style-name="P24">Isa<text:span text:style-name="T14">iah</text:span> 32:6</text:p>
            <text:p text:style-name="Table_20_Contents">For the vile person will speak villany, and his <text:span text:style-name="T2">heart will work iniquity</text:span>, to practise hypocrisy, and to <text:span text:style-name="T2">utter</text:span> error against the LORD, to make empty the soul of the hungry, and he will cause the drink of the thirsty to fail.</text:p>
          </table:table-cell>
        </table:table-row>
      </table:table>
      <text:list text:style-name="L8">
        <text:list-item>
          <text:p text:style-name="P25">A heart can work iniquity</text:p>
        </text:list-item>
        <text:list-item>
          <text:p text:style-name="P25">A heart can speak</text:p>
        </text:list-item>
      </text:list>
      <text:p text:style-name="P26"/>
      <text:p text:style-name="P26"/>
      <table:table table:name="Table12" table:style-name="Table12">
        <table:table-column table:style-name="Table12.A"/>
        <table:table-row>
          <table:table-cell table:style-name="Table12.A1" office:value-type="string">
            <text:p text:style-name="Table_20_Contents"><text:span text:style-name="T1">Proverbs 2:10-11</text:span><text:line-break/><text:span text:style-name="T7">10</text:span> When wisdom <text:span text:style-name="T2">entereth into thine heart</text:span>, and <text:span text:style-name="T2">knowledge is pleasant unto thy soul</text:span>; <text:line-break/><text:span text:style-name="T7">11</text:span> Discretion shall preserve thee, understanding shall keep thee:</text:p>
          </table:table-cell>
        </table:table-row>
      </table:table>
      <text:list text:style-name="L9">
        <text:list-item>
          <text:p text:style-name="P27">Wisdom can enter into a heart</text:p>
        </text:list-item>
        <text:list-item>
          <text:p text:style-name="P28">Knowledge can be pleasant to a soul</text:p>
        </text:list-item>
      </text:list>
      <text:p text:style-name="P29"/>
      <text:p text:style-name="P29"/>
      <table:table table:name="Table13" table:style-name="Table13">
        <table:table-column table:style-name="Table13.A"/>
        <table:table-column table:style-name="Table13.B"/>
        <table:table-column table:style-name="Table13.C"/>
        <table:table-column table:style-name="Table13.B"/>
        <table:table-column table:style-name="Table13.A"/>
        <table:table-column table:style-name="Table13.F"/>
        <text:soft-page-break/>
        <table:table-row table:style-name="Table13.1">
          <table:table-cell table:style-name="Table13.A1" office:value-type="string">
            <text:p text:style-name="P30">Mark 12:30</text:p>
            <text:p text:style-name="P31">And thou shalt love the Lord thy God with all thy <text:span text:style-name="T2">heart</text:span>, and with all thy <text:span text:style-name="T15">soul</text:span>, and with all thy <text:span text:style-name="T2">mind</text:span>, and with all thy <text:span text:style-name="T3">strength</text:span>: this is the first commandment.</text:p>
          </table:table-cell>
          <table:table-cell table:style-name="Table13.A1" office:value-type="string">
            <text:p text:style-name="Table_20_Contents"><text:span text:style-name="T1">Matthew 22:37<text:line-break/></text:span>Jesus said unto him, <text:span text:style-name="T11">Thou shalt love the Lord thy God with all thy </text:span><text:span text:style-name="T16">heart</text:span><text:span text:style-name="T11">, and with all thy </text:span><text:span text:style-name="T12">soul</text:span><text:span text:style-name="T11">, and with all thy </text:span><text:span text:style-name="T12">mind</text:span><text:span text:style-name="T11">.</text:span></text:p>
          </table:table-cell>
          <table:table-cell table:style-name="Table13.A1" office:value-type="string">
            <text:p text:style-name="P24">Luke 10:27</text:p>
            <text:p text:style-name="Table_20_Contents">And he answering said, Thou shalt love the Lord thy God with all thy <text:span text:style-name="T2">heart</text:span>, and with all thy <text:span text:style-name="T2">soul</text:span>, and with all thy <text:span text:style-name="T3">strength</text:span>, and with all thy <text:span text:style-name="T3">mind</text:span>; and thy neighbour as thyself.</text:p>
          </table:table-cell>
          <table:table-cell table:style-name="Table13.A1" office:value-type="string">
            <text:p text:style-name="P32">Deu 6:5</text:p>
            <text:p text:style-name="Table_20_Contents">And thou shalt love the LORD thy God with all thine <text:span text:style-name="T2">heart</text:span>, and with all thy <text:span text:style-name="T2">soul</text:span>, and with all thy <text:span text:style-name="T3">might</text:span>.</text:p>
          </table:table-cell>
          <table:table-cell table:style-name="Table13.A1" office:value-type="string">
            <text:p text:style-name="P33">Deu 10:12</text:p>
            <text:p text:style-name="P34">And now, Israel, what doth the LORD thy God require of thee, but to fear the LORD thy God, to walk in all his ways, and to love him, and to serve the LORD thy God with all thy <text:span text:style-name="T2">heart</text:span> and with all thy <text:span text:style-name="T2">soul</text:span>,</text:p>
          </table:table-cell>
          <table:table-cell table:style-name="Table13.F1" office:value-type="string">
            <text:p text:style-name="P34"><text:span text:style-name="T1">Deu 30:6<text:line-break/></text:span>And the LORD thy God will circumcise thine <text:span text:style-name="T2">heart</text:span>, and the <text:span text:style-name="T2">heart</text:span> of thy seed, to love the LORD thy God with all thine <text:span text:style-name="T2">heart</text:span>, and with all thy <text:span text:style-name="T2">soul</text:span>, that thou mayest live.</text:p>
          </table:table-cell>
        </table:table-row>
      </table:table>
      <text:p text:style-name="P29"/>
      <text:p text:style-name="P29"/>
      <table:table table:name="Table17" table:style-name="Table17">
        <table:table-column table:style-name="Table17.A"/>
        <table:table-row>
          <table:table-cell table:style-name="Table17.A1" office:value-type="string">
            <text:p text:style-name="P35"><text:span text:style-name="T1">2 Peter 1:13-14</text:span><text:line-break/><text:span text:style-name="T7">13</text:span> Yea, I think it meet, as long as <text:span text:style-name="T17">I</text:span> am in this <text:span text:style-name="T2">tabernacle</text:span>, to stir you up by putting you in remembrance;</text:p>
            <text:p text:style-name="P35"><text:span text:style-name="T7">14</text:span> Knowing that shortly <text:span text:style-name="T17">I</text:span> must put off this my <text:span text:style-name="T2">tabernacle</text:span>, even as our Lord Jesus Christ hath shewed me.</text:p>
          </table:table-cell>
        </table:table-row>
      </table:table>
      <text:p text:style-name="P29"/>
      <table:table table:name="Table18" table:style-name="Table18">
        <table:table-column table:style-name="Table18.A"/>
        <table:table-row>
          <table:table-cell table:style-name="Table18.A1" office:value-type="string">
            <text:p text:style-name="Table_20_Contents"><text:span text:style-name="T1">2 Corinthians 4:7</text:span><text:line-break/>But we have this treasure in <text:span text:style-name="T2">earthen vessels</text:span>, that the excellency of the power may be of God, and not of us.</text:p>
            <text:p text:style-name="Table_20_Contents"/>
            <text:p text:style-name="Table_20_Contents"><text:span text:style-name="T1">2 Corinthians 4:18</text:span><text:line-break/>While we look not at the things which are seen, but at the things which are not seen: for <text:span text:style-name="T17">the things which are seen are temporal</text:span>; but <text:span text:style-name="T17">the things which are not seen are eternal</text:span>.</text:p>
            <text:p text:style-name="Table_20_Contents"/>
            <text:p text:style-name="P36"><text:span text:style-name="T1">2 Corinthians 5:1-4</text:span><text:line-break/><text:span text:style-name="T7">1</text:span> For we know that if our <text:span text:style-name="T2">earthly house</text:span> of this <text:span text:style-name="T2">tabernacle</text:span> were dissolved, we have a <text:span text:style-name="T3">building of God</text:span>, <text:span text:style-name="T3">an house not made with hands</text:span>, eternal in the heavens.</text:p>
            <text:p text:style-name="P36"><text:span text:style-name="T7">2</text:span> For in this we groan, earnestly desiring to be clothed upon with our <text:span text:style-name="T2">house</text:span> which is from heaven:</text:p>
            <text:p text:style-name="P36"><text:span text:style-name="T7">3</text:span> If so be that being clothed we shall not be found naked.</text:p>
            <text:p text:style-name="P36"><text:span text:style-name="T7">4</text:span> For we that are in this <text:span text:style-name="T2">tabernacle</text:span> do groan, being burdened: not for that we would be unclothed, but clothed upon, that mortality might be swallowed up of life.</text:p>
            <text:p text:style-name="P36"/>
            <text:p text:style-name="P37"><text:span text:style-name="T1">2 Corinthians 5:6-8</text:span><text:line-break/><text:span text:style-name="T7">6</text:span> Therefore we are always confident, knowing that, whilst we are at <text:span text:style-name="T2">home in the body</text:span>, we are absent from the Lord:</text:p>
            <text:p text:style-name="P37"><text:span text:style-name="T7">7</text:span> (For we walk by faith, not by sight:)</text:p>
            <text:p text:style-name="P37"><text:span text:style-name="T7">8</text:span> We are confident, I say, and willing rather to be absent from the <text:span text:style-name="T2">body</text:span>, and to be present with the Lord.</text:p>
          </table:table-cell>
        </table:table-row>
      </table:table>
      <text:p text:style-name="P29"/>
      <text:p text:style-name="P29"/>
      <table:table table:name="Table19" table:style-name="Table19">
        <table:table-column table:style-name="Table19.A"/>
        <table:table-row>
          <table:table-cell table:style-name="Table19.A1" office:value-type="string">
            <text:p text:style-name="Table_20_Contents"><text:span text:style-name="T1">Job 23:13</text:span><text:line-break/>But he is in one mind, and who can turn him? and what his soul desireth, even that he doeth.</text:p>
          </table:table-cell>
        </table:table-row>
      </table:table>
      <text:p text:style-name="P29"/>
      <text:p text:style-name="P29"/>
      <table:table table:name="Table20" table:style-name="Table20">
        <table:table-column table:style-name="Table20.A"/>
        <text:soft-page-break/>
        <table:table-row table:style-name="Table20.1">
          <table:table-cell table:style-name="Table20.A1" office:value-type="string">
            <text:p text:style-name="Table_20_Contents"><text:span text:style-name="T1">Luke 12:20</text:span><text:line-break/>But God said unto him, Thou fool, this night thy <text:span text:style-name="T2">soul</text:span> shall be required of thee: then whose shall those things be, which thou hast provided?</text:p>
          </table:table-cell>
        </table:table-row>
      </table:table>
      <text:p text:style-name="P29"/>
      <text:p text:style-name="P29"/>
      <table:table table:name="Table21" table:style-name="Table21">
        <table:table-column table:style-name="Table21.A"/>
        <table:table-row>
          <table:table-cell table:style-name="Table21.A1" office:value-type="string">
            <text:p text:style-name="P38"><text:span text:style-name="T1">Colossians 2:10-13</text:span><text:line-break/><text:span text:style-name="T7">10</text:span> And ye are complete in him, which is the head of all principality and power:</text:p>
            <text:p text:style-name="P38"><text:span text:style-name="T7">11</text:span> In whom also ye are circumcised with <text:span text:style-name="T2">the circumcision made without hands</text:span>, in putting off the body of the sins of the flesh by the circumcision of Christ:</text:p>
            <text:p text:style-name="P38"><text:span text:style-name="T7">12</text:span> Buried with him in baptism, wherein also ye are risen with him through the faith of <text:span text:style-name="T2">the operation of God</text:span>, who hath raised him from the dead.</text:p>
            <text:p text:style-name="P38"><text:span text:style-name="T7">13</text:span> And you, being dead in your sins and the uncircumcision of your flesh, hath he quickened together with him, having forgiven you all trespasses;</text:p>
          </table:table-cell>
        </table:table-row>
      </table:table>
      <text:p text:style-name="P29"/>
      <text:p text:style-name="P29"/>
      <table:table table:name="Table22" table:style-name="Table22">
        <table:table-column table:style-name="Table22.A"/>
        <table:table-row>
          <table:table-cell table:style-name="Table22.A1" office:value-type="string">
            <text:p text:style-name="Table_20_Contents"><text:span text:style-name="T1">1 Peter 1:22</text:span><text:line-break/>Seeing ye have purified your souls in obeying the truth through the Spirit unto unfeigned love of the brethren, see that ye love one another with a pure heart fervently:</text:p>
          </table:table-cell>
        </table:table-row>
      </table:table>
      <text:p text:style-name="P29"/>
      <text:p text:style-name="P29"/>
      <table:table table:name="Table23" table:style-name="Table23">
        <table:table-column table:style-name="Table23.A"/>
        <table:table-row>
          <table:table-cell table:style-name="Table23.A1" office:value-type="string">
            <text:p text:style-name="Table_20_Contents"><text:span text:style-name="T1">Ephesians 4:30</text:span><text:line-break/>And grieve not the holy Spirit of God, whereby ye are <text:span text:style-name="T2">sealed</text:span> unto the day of redemption.</text:p>
          </table:table-cell>
        </table:table-row>
      </table:table>
      <text:p text:style-name="P29"/>
      <text:p text:style-name="P29"/>
      <table:table table:name="Table24" table:style-name="Table24">
        <table:table-column table:style-name="Table24.A"/>
        <table:table-row>
          <table:table-cell table:style-name="Table24.A1" office:value-type="string">
            <text:p text:style-name="P39"><text:span text:style-name="T1">Hebrews 12:22-24</text:span><text:line-break/><text:span text:style-name="T7">22</text:span> But ye are come unto mount Sion, and unto the city of the living God, the heavenly Jerusalem, and to an innumerable company of angels,</text:p>
            <text:p text:style-name="P39"><text:span text:style-name="T7">23</text:span> To the general assembly and church of the firstborn, which are written in heaven, and to God the Judge of all, and to <text:span text:style-name="T2">the spirits of just men made perfect</text:span>,</text:p>
            <text:p text:style-name="P39"><text:span text:style-name="T7">24</text:span> And to Jesus the mediator of the new covenant, and to the blood of sprinkling, that speaketh better things than that of Abel.</text:p>
          </table:table-cell>
        </table:table-row>
      </table:table>
      <text:list text:style-name="L10">
        <text:list-item>
          <text:p text:style-name="P40">OT saint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fo:padding="0.0201in"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0T12:53:58.719289400</meta:creation-date>
    <dc:title>default</dc:title>
    <meta:editing-duration>PT1H41M7S</meta:editing-duration>
    <meta:editing-cycles>72</meta:editing-cycles>
    <meta:generator>LibreOffice/25.8.1.1$Windows_X86_64 LibreOffice_project/54047653041915e595ad4e45cccea684809c77b5</meta:generator>
    <meta:initial-creator>William K. McDannell Jr.</meta:initial-creator>
    <dc:date>2025-10-10T14:35:34.868443600</dc:date>
    <dc:creator>William K. McDannell Jr.</dc:creator>
    <meta:document-statistic meta:table-count="24" meta:image-count="0" meta:object-count="0" meta:page-count="5" meta:paragraph-count="94" meta:word-count="2050" meta:character-count="10616" meta:non-whitespace-character-count="8676"/>
    <meta:template xlink:type="simple" xlink:actuate="onRequest" xlink:title="default" xlink:href="../../AppData/Roaming/LibreOffice/4/user/template/default.ott" meta:date="2025-10-10T12:53:58.275235100"/>
  </office:meta>
</office:document-meta>
</file>