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Arial_1.ttf" manifest:media-type="application/x-font-ttf"/>
  <manifest:file-entry manifest:full-path="Fonts/Font_Liberation_Sans_3.ttf" manifest:media-type="application/x-font-ttf"/>
  <manifest:file-entry manifest:full-path="Fonts/Font_Gabriela_Nerd_Font_1.ttf" manifest:media-type="application/x-font-ttf"/>
  <manifest:file-entry manifest:full-path="Fonts/Font_Liberation_Sans_4.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ystem" style:font-pitch="variable"/>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8.2in" fo:break-before="page"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A1" style:family="table-cell">
      <style:table-cell-properties fo:padding="0.0382in" fo:border="0.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8" style:family="table">
      <style:table-properties style:width="8.2in" table:align="margins"/>
    </style:style>
    <style:style style:name="Table8.A" style:family="table-column">
      <style:table-column-properties style:column-width="8.2in" style:rel-column-width="65535*"/>
    </style:style>
    <style:style style:name="Table8.A1" style:family="table-cell">
      <style:table-cell-properties fo:padding="0.0382in" fo:border="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officeooo:paragraph-rsid="002ddcc2"/>
    </style:style>
    <style:style style:name="P2" style:family="paragraph" style:parent-style-name="Table_20_Contents">
      <style:text-properties officeooo:paragraph-rsid="002e95be"/>
    </style:style>
    <style:style style:name="P3" style:family="paragraph" style:parent-style-name="Table_20_Contents">
      <style:text-properties officeooo:rsid="002e95be" officeooo:paragraph-rsid="002e95be"/>
    </style:style>
    <style:style style:name="P4" style:family="paragraph" style:parent-style-name="Standard">
      <style:text-properties fo:color="#127622" loext:opacity="100%" style:font-name="Gabriela Nerd Font" officeooo:rsid="0040bd72" officeooo:paragraph-rsid="00313880"/>
    </style:style>
    <style:style style:name="P5" style:family="paragraph" style:parent-style-name="Table_20_Contents">
      <style:text-properties officeooo:paragraph-rsid="00339ae5"/>
    </style:style>
    <style:style style:name="P6" style:family="paragraph" style:parent-style-name="Table_20_Contents">
      <style:text-properties officeooo:paragraph-rsid="0034ebe3"/>
    </style:style>
    <style:style style:name="P7" style:family="paragraph" style:parent-style-name="Standard">
      <style:paragraph-properties fo:text-align="center" style:justify-single-word="false"/>
      <style:text-properties officeooo:rsid="003ff76a" officeooo:paragraph-rsid="0040143c"/>
    </style:style>
    <style:style style:name="P8" style:family="paragraph" style:parent-style-name="Standard">
      <style:paragraph-properties fo:text-align="center" style:justify-single-word="false"/>
      <style:text-properties officeooo:rsid="003d2c1e" officeooo:paragraph-rsid="003d2c1e"/>
    </style:style>
    <style:style style:name="P9" style:family="paragraph" style:parent-style-name="Table_20_Contents">
      <style:text-properties officeooo:paragraph-rsid="0039fc5a"/>
    </style:style>
    <style:style style:name="P10" style:family="paragraph" style:parent-style-name="Standard" style:list-style-name="L1">
      <style:text-properties officeooo:rsid="0027a4c2" officeooo:paragraph-rsid="0027a4c2"/>
    </style:style>
    <style:style style:name="P11" style:family="paragraph" style:parent-style-name="Standard">
      <style:text-properties officeooo:rsid="0027a4c2" officeooo:paragraph-rsid="0027a4c2"/>
    </style:style>
    <style:style style:name="P12" style:family="paragraph" style:parent-style-name="Standard" style:list-style-name="L1">
      <style:text-properties officeooo:rsid="00313880" officeooo:paragraph-rsid="00313880"/>
    </style:style>
    <style:style style:name="T1" style:family="text">
      <style:text-properties fo:color="#127622" loext:opacity="100%" style:font-name="Gabriela Nerd Font" officeooo:rsid="0040bd72"/>
    </style:style>
    <style:style style:name="T2" style:family="text">
      <style:text-properties style:text-position="33% 80%"/>
    </style:style>
    <style:style style:name="T3" style:family="text">
      <style:text-properties fo:font-style="italic"/>
    </style:style>
    <style:style style:name="T4" style:family="text">
      <style:text-properties fo:background-color="#ffff00" loext:char-shading-value="0"/>
    </style:style>
    <style:style style:name="T5" style:family="text">
      <style:text-properties fo:background-color="#ffbf00" loext:char-shading-value="0"/>
    </style:style>
    <style:style style:name="T6" style:family="text">
      <style:text-properties fo:font-style="italic" fo:background-color="#ffff00" loext:char-shading-value="0"/>
    </style:style>
    <style:style style:name="T7" style:family="text">
      <style:text-properties officeooo:rsid="002ddcc2"/>
    </style:style>
    <style:style style:name="T8" style:family="text">
      <style:text-properties officeooo:rsid="00313880"/>
    </style:style>
    <style:style style:name="T9" style:family="text">
      <style:text-properties officeooo:rsid="002e95be"/>
    </style:style>
    <style:style style:name="T10" style:family="text">
      <style:text-properties officeooo:rsid="002f498e"/>
    </style:style>
    <style:style style:name="T11" style:family="text">
      <style:text-properties officeooo:rsid="0034ebe3"/>
    </style:style>
    <style:style style:name="T12" style:family="text">
      <style:text-properties officeooo:rsid="0038badd"/>
    </style:style>
    <style:style style:name="T13" style:family="text">
      <style:text-properties style:use-window-font-color="true" loext:opacity="0%"/>
    </style:style>
    <style:style style:name="T14" style:family="text">
      <style:text-properties style:use-window-font-color="true" loext:opacity="0%" officeooo:rsid="003bf5f3"/>
    </style:style>
    <style:style style:name="T15" style:family="text">
      <style:text-properties style:text-position="super 58%" officeooo:rsid="0039fc5a"/>
    </style:style>
    <style:style style:name="T16" style:family="text">
      <style:text-properties style:text-position="0% 100%" officeooo:rsid="0039fc5a"/>
    </style:style>
    <style:style style:name="T17" style:family="text">
      <style:text-properties officeooo:rsid="0027adcb"/>
    </style:style>
    <style:style style:name="T18" style:family="text">
      <style:text-properties officeooo:rsid="0029e74d"/>
    </style:style>
    <style:style style:name="T19" style:family="text">
      <style:text-properties officeooo:rsid="0028ddcf"/>
    </style:style>
    <style:style style:name="T20" style:family="text">
      <style:text-properties fo:color="#127622" loext:opacity="100%" style:font-name="Gabriela Nerd Font" officeooo:rsid="003209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Table_20_Contents"><text:span text:style-name="T1">2 Samuel 21:1-14</text:span><text:line-break/><text:span text:style-name="T2">1</text:span> Then there was a famine in the days of David three years, year after year; and David enquired of the LORD. And the LORD answered, <text:span text:style-name="T3">It is</text:span> for <text:span text:style-name="T4">Saul</text:span>, and for <text:span text:style-name="T3">his</text:span> bloody house, because <text:span text:style-name="T4">he slew</text:span> the <text:span text:style-name="T4">Gibeonites</text:span>. <text:line-break/><text:span text:style-name="T2">2</text:span> And the king called the <text:span text:style-name="T4">Gibeonites</text:span>, and said unto them; (now the <text:span text:style-name="T4">Gibeonites</text:span> <text:span text:style-name="T3">were</text:span> not of the children of Israel, but of the <text:span text:style-name="T5">remnant of the Amorites</text:span>; and <text:span text:style-name="T4">the children of Israel had sworn unto them</text:span>: and Saul sought to slay them in his zeal to the children of Israel and Judah.)<text:line-break/><text:span text:style-name="T2">3</text:span> Wherefore David said unto the <text:span text:style-name="T4">Gibeonites</text:span>, What shall I do for you? and wherewith shall I make the atonement, that ye may bless the inheritance of the LORD?<text:line-break/><text:span text:style-name="T2">4</text:span> And the <text:span text:style-name="T4">Gibeonites</text:span> said unto him, We will have no silver nor gold of Saul, nor of his house; neither for us shalt thou kill any man in Israel. And he said, What ye shall say, <text:span text:style-name="T3">that</text:span> will I do for you.<text:line-break/><text:span text:style-name="T2">5</text:span> And they answered the king, The man that consumed us, and that <text:span text:style-name="T4">devised against us </text:span><text:span text:style-name="T6">that</text:span><text:span text:style-name="T4"> we should be destroyed from remaining in any of the coasts of Israel</text:span>,<text:line-break/><text:span text:style-name="T2">6</text:span> Let seven men of his sons be delivered unto us, and we will hang them up unto the LORD in Gibeah of Saul, <text:span text:style-name="T3">whom</text:span> the LORD did choose. And the king said, I will give <text:span text:style-name="T3">them</text:span>.<text:line-break/><text:span text:style-name="T2">7</text:span> But the king spared Mephibosheth, the son of Jonathan the son of Saul, because of the LORD's oath that <text:span text:style-name="T3">was</text:span> between them, between David and Jonathan the son of Saul.<text:line-break/><text:span text:style-name="T2">8</text:span> But the king took the two sons of Rizpah the daughter of Aiah, whom she bare unto Saul, Armoni and Mephibosheth; and the five sons of Michal the daughter of Saul, whom she brought up for Adriel the son of Barzillai the Meholathite:<text:line-break/><text:span text:style-name="T2">9</text:span> And he delivered them into the hands of the <text:span text:style-name="T4">Gibeonites</text:span>, and they hanged them in the hill before the LORD: and they fell <text:span text:style-name="T3">all</text:span> seven together, and were put to death in the days of harvest, in the first <text:span text:style-name="T3">days</text:span>, in the beginning of barley harvest.<text:line-break/><text:span text:style-name="T2">10</text:span> And Rizpah the daughter of Aiah took sackcloth, and spread it for her upon the rock, from the beginning of harvest until water dropped upon them out of heaven, and suffered neither the birds of the air to rest on them by day, nor the beasts of the field by night.<text:line-break/><text:span text:style-name="T2">11</text:span> And it was told David what Rizpah the daughter of Aiah, the concubine of Saul, had done.<text:line-break/><text:span text:style-name="T2">12</text:span> And David went and took the bones of Saul and the bones of Jonathan his son from the men of Jabesh-gilead, which had stolen them from the street of Beth-shan, where the Philistines had hanged them, when the Philistines had slain Saul in Gilboa:<text:line-break/><text:span text:style-name="T2">13</text:span> And he brought up from thence the bones of Saul and the bones of Jonathan his son; and they gathered the bones of them that were hanged.<text:line-break/><text:span text:style-name="T2">14</text:span> And the bones of Saul and Jonathan his son buried they in the country of Benjamin in Zelah, in the sepulchre of Kish his father: and they performed all that the king commanded. And after that God was intreated for the land.</text:p>
          </table:table-cell>
        </table:table-row>
      </table:table>
      <text:p text:style-name="Standard"/>
      <text:p text:style-name="Standard"/>
      <text:p text:style-name="Standard"/>
      <table:table table:name="Table2" table:style-name="Table2">
        <table:table-column table:style-name="Table2.A"/>
        <table:table-row>
          <table:table-cell table:style-name="Table2.A1" office:value-type="string">
            <text:p text:style-name="Table_20_Contents"><text:span text:style-name="T1">Joshua 9:1-27</text:span><text:line-break/><text:span text:style-name="T2">1</text:span> And it came to pass, when all the kings which <text:span text:style-name="T3">were</text:span> on this side Jordan, in the hills, and in the valleys, and in all the coasts of the great sea over against Lebanon, the Hittite, and the <text:span text:style-name="T4">Amorite</text:span>, the Canaanite, the Perizzite, the <text:span text:style-name="T4">Hivite</text:span>, and the Jebusite, heard <text:span text:style-name="T3">thereof</text:span>; <text:line-break/><text:span text:style-name="T2">2</text:span> That they gathered themselves together, to fight with Joshua and with Israel, with one accord. <text:line-break/><text:span text:style-name="T2">3</text:span> And when the <text:span text:style-name="T5">inhabitants of Gibeon</text:span> heard what Joshua had done unto Jericho and to Ai, <text:line-break/><text:span text:style-name="T2">4</text:span> They did work wilily, and went and made as if they had been ambassadors, and took old sacks upon their asses, and wine bottles, old, and rent, and bound up; <text:line-break/><text:span text:style-name="T2">5</text:span> And old shoes and clouted upon their feet, and old garments upon them; and all the bread of their provision was dry <text:span text:style-name="T3">and</text:span> mouldy. <text:line-break/><text:span text:style-name="T2">6</text:span> And they went to Joshua unto the camp at Gilgal, and said unto him, and to the men of Israel, We be come from a far country: now therefore make ye a league with us. <text:line-break/><text:span text:style-name="T2">7</text:span> And the men of Israel said unto the <text:span text:style-name="T5">Hivites</text:span>, Peradventure ye dwell among us; and how shall we make a league with you? <text:line-break/><text:span text:style-name="T2">8</text:span> And they said unto Joshua, We <text:span text:style-name="T3">are</text:span> thy servants. And Joshua said unto them, Who <text:span text:style-name="T3">are</text:span> ye? and from whence come ye? <text:line-break/><text:span text:style-name="T2">9</text:span> And they said unto him, From a very far country thy servants are come because of the name of the LORD thy God: for we have heard the fame of him, and all that he did in Egypt, <text:line-break/><text:span text:style-name="T2">10</text:span> And all that he did to the <text:span text:style-name="T4">two kings of the Amorites, that </text:span><text:span text:style-name="T6">were</text:span><text:span text:style-name="T4"> beyond Jordan, to Sihon king of Heshbon, and to Og king of Bashan, which </text:span><text:span text:style-name="T6">was</text:span><text:span text:style-name="T4"> at Ashtaroth.</text:span> <text:line-break/><text:span text:style-name="T2">11</text:span> Wherefore our elders and all the inhabitants of our country spake to us, saying, Take victuals with you for the journey, and go to meet them, and say unto them, We <text:span text:style-name="T3">are</text:span> your servants: therefore now make ye a league with us. <text:line-break/><text:span text:style-name="T2">12</text:span> This our bread we took hot <text:span text:style-name="T3">for</text:span> our provision out of our houses on the day we came forth to go unto you; but now, behold, it is dry, and it is mouldy: <text:line-break/><text:span text:style-name="T2">13</text:span> And these bottles of wine, which we filled, <text:span text:style-name="T3">were</text:span> new; and, behold, they be rent: and these our garments and our shoes are become old by reason of the very long journey. <text:line-break/><text:span text:style-name="T2">14</text:span> And the men took of their victuals, and asked not <text:span text:style-name="T3">counsel</text:span> at the mouth of the LORD. <text:line-break/><text:span text:style-name="T2">15</text:span> And Joshua made peace with them, and made a league with them, to let them live: and <text:span text:style-name="T4">the princes of the congregation sware unto them.</text:span> <text:line-break/><text:span text:style-name="T2">16</text:span> And it came to pass at the end of three days after they had made a league with them, that they heard that they <text:span text:style-name="T3">were</text:span> their neighbours, and <text:span text:style-name="T3">that</text:span> they dwelt among them. <text:line-break/><text:span text:style-name="T2">17</text:span> And the children of Israel journeyed, and came unto <text:span text:style-name="T4">their cities</text:span> on the third day. Now their cities <text:span text:style-name="T3">were</text:span> <text:span text:style-name="T4">Gibeon</text:span>, and <text:span text:style-name="T4">Chephirah</text:span>, and <text:span text:style-name="T4">Beeroth</text:span>, and <text:span text:style-name="T4">Kirjath-jearim</text:span>. <text:line-break/><text:span text:style-name="T2">18</text:span> And the children of Israel smote them not, because the princes of the congregation had <text:span text:style-name="T4">sworn unto them by the LORD God of Israel</text:span>. And all the congregation murmured against the princes. <text:line-break/><text:span text:style-name="T2">19</text:span> But all the princes said unto all the congregation, <text:span text:style-name="T4">We have sworn unto them by the LORD God of Israel</text:span>: now therefore we may not touch them. <text:line-break/><text:span text:style-name="T2">20</text:span> This we will do to them; we will even let them live, lest wrath be upon us, because of the oath which we sware unto them. <text:line-break/><text:span text:style-name="T2">21</text:span> And the princes said unto them, Let them live; but <text:span text:style-name="T4">let them be hewers of wood and drawers of water unto all the congregation</text:span>; as the princes had promised them. <text:line-break/><text:span text:style-name="T2">22</text:span> And Joshua called for them, and he spake unto them, saying, Wherefore have ye beguiled us, saying, We <text:span text:style-name="T3">are</text:span> very far from you; when ye dwell among us? <text:line-break/><text:span text:style-name="T2">23</text:span> Now therefore ye <text:span text:style-name="T3">are</text:span> cursed, and there shall <text:span text:style-name="T4">none of you be freed from being bondmen</text:span>, and <text:span text:style-name="T4">hewers of wood and drawers of water for the house of my God</text:span>. <text:line-break/><text:span text:style-name="T2">24</text:span> And they answered Joshua, and said, Because it was certainly told thy servants, how that the LORD thy God commanded his servant Moses to give you all the land, and to destroy all the inhabitants of the land from before you, therefore we were sore afraid of our lives because of you, and have done this thing. <text:line-break/><text:span text:style-name="T2">25</text:span> And now, behold, we <text:span text:style-name="T3">are</text:span> in thine hand: as it seemeth good and right unto thee to do unto us, do. <text:line-break/><text:soft-page-break/><text:span text:style-name="T2">26</text:span> And so did he unto them, and delivered them out of the hand of the children of Israel, that they slew them not. <text:line-break/><text:span text:style-name="T2">27</text:span> And Joshua made them that day <text:span text:style-name="T4">hewers of wood and drawers of water for the congregation</text:span>, and <text:span text:style-name="T4">for the altar of the LORD</text:span>, even unto this day, in the place which he should choose.</text:p>
          </table:table-cell>
        </table:table-row>
      </table:table>
      <text:p text:style-name="Standard"/>
      <table:table table:name="Table3" table:style-name="Table3">
        <table:table-column table:style-name="Table3.A"/>
        <table:table-row>
          <table:table-cell table:style-name="Table3.A1" office:value-type="string">
            <text:p text:style-name="P1"><text:span text:style-name="T1">1 Samuel 22:11-19</text:span><text:span text:style-name="T7"> </text:span><text:span text:style-name="T8">(Saul orders the execution of the priests of Nob and also the inhabitants of Nob)</text:span></text:p>
          </table:table-cell>
        </table:table-row>
      </table:table>
      <text:p text:style-name="Standard"/>
      <table:table table:name="Table4" table:style-name="Table4">
        <table:table-column table:style-name="Table4.A"/>
        <table:table-row>
          <table:table-cell table:style-name="Table4.A1" office:value-type="string">
            <text:p text:style-name="P2"><text:span text:style-name="T1">Gen 10:15-17</text:span><text:span text:style-name="T9"> (Noah→ Ham→ Canaan→ </text:span><text:span text:style-name="T10">Amorite</text:span></text:p>
            <text:p text:style-name="P3"><text:s text:c="61"/><text:span text:style-name="T10">|</text:span>→ <text:span text:style-name="T10">Hivite)</text:span><text:line-break/><text:span text:style-name="T2">15</text:span> And Canaan begat Sidon his firstborn, and Heth, <text:line-break/><text:span text:style-name="T2">16</text:span> And the Jebusite, and the Amorite, and the Girgasite, <text:line-break/><text:span text:style-name="T2">17</text:span> And the Hivite, and the Arkite, and the Sinite,</text:p>
          </table:table-cell>
        </table:table-row>
      </table:table>
      <text:p text:style-name="Standard"/>
      <table:table table:name="Table5" table:style-name="Table5">
        <table:table-column table:style-name="Table5.A"/>
        <table:table-row>
          <table:table-cell table:style-name="Table5.A1" office:value-type="string">
            <text:p text:style-name="P4">Numbers 13:29</text:p>
            <text:p text:style-name="P5">The Amalekites dwell in the land of the south: and the Hittites, and the Jebusites, and the <text:span text:style-name="T4">Amorites</text:span>, <text:span text:style-name="T4">dwell in the mountains</text:span>: and the Canaanites dwell by the sea, and by the coast of Jordan.</text:p>
          </table:table-cell>
        </table:table-row>
      </table:table>
      <text:p text:style-name="Standard"/>
      <table:table table:name="Table6" table:style-name="Table6">
        <table:table-column table:style-name="Table6.A"/>
        <table:table-row>
          <table:table-cell table:style-name="Table6.A1" office:value-type="string">
            <text:p text:style-name="P6"><text:span text:style-name="T1">Numbers 21:21</text:span><text:span text:style-name="T11"> (The battle against Sihon king of the Amorites; which took place west of the Jordan and north of Moab; </text:span><text:span text:style-name="T12">Heshbon is ~21.9 miles west of OT Jericho</text:span><text:span text:style-name="T11">).</text:span></text:p>
          </table:table-cell>
        </table:table-row>
      </table:table>
      <text:p text:style-name="Standard"/>
      <text:p text:style-name="P7">After arriving at Kadesh-barnea</text:p>
      <text:p text:style-name="P7">(~91.3 miles southwest of Jerusalem), Moses calls the nearby mountain the “mountain of the Amorites”</text:p>
      <table:table table:name="Table8" table:style-name="Table8">
        <table:table-column table:style-name="Table8.A"/>
        <table:table-row>
          <table:table-cell table:style-name="Table8.A1" office:value-type="string">
            <text:p text:style-name="Table_20_Contents"><text:span text:style-name="T1">Deuteronomy 1:19-20</text:span><text:line-break/><text:span text:style-name="T2">19</text:span> And when we departed from Horeb, we went through all that great and terrible wilderness, which ye saw by the way of the mountain of the Amorites, as the LORD our God commanded us; and <text:span text:style-name="T4">we came to Kadesh-barnea.</text:span> <text:line-break/><text:span text:style-name="T2">20</text:span> And I said unto you, <text:span text:style-name="T4">Ye are come unto the mountain of the Amorites</text:span>, which the LORD our God doth give unto us.</text:p>
          </table:table-cell>
        </table:table-row>
      </table:table>
      <text:p text:style-name="Standard"/>
      <text:p text:style-name="P8">Amorites that could qualify as the “remnant of the Amorites”</text:p>
      <table:table table:name="Table7" table:style-name="Table7">
        <table:table-column table:style-name="Table7.A"/>
        <table:table-row>
          <table:table-cell table:style-name="Table7.A1" office:value-type="string">
            <text:p text:style-name="P9"><text:span text:style-name="T1">Numbers 21:32</text:span><text:span text:style-name="T13"> </text:span><text:span text:style-name="T14">(Jaazer/Jazer is speculated to be ~ 10 miles north of Heshbon)</text:span></text:p>
            <text:p text:style-name="P9">And Moses sent to spy out Jaazer<text:span text:style-name="T15">H3270</text:span><text:span text:style-name="T16"> [AKA Jazer]</text:span>, and they took the villages thereof, and <text:span text:style-name="T4">drove out the Amorites that were there</text:span>.</text:p>
          </table:table-cell>
        </table:table-row>
        <table:table-row>
          <table:table-cell table:style-name="Table7.A2" office:value-type="string">
            <text:p text:style-name="P4">Numbers 32:39</text:p>
            <text:p text:style-name="Table_20_Contents">And the children of Machir the son of Manasseh went to Gilead, and took it, and <text:span text:style-name="T4">dispossessed the Amorite which was in it</text:span>.</text:p>
          </table:table-cell>
        </table:table-row>
      </table:table>
      <text:p text:style-name="Standard"/>
      <text:list text:style-name="L1">
        <text:list-item>
          <text:p text:style-name="P10">If the “Gibeonites” that Saul slew (when he destroyed the inhabitants of Nob) were the same “inhabitants of Gibeon” that the “princes of the congregation” swore an oath <text:span text:style-name="T17">to </text:span>by God in Joshua 9, how then could thos<text:span text:style-name="T17">e Gibeon</text:span><text:span text:style-name="T18">ite</text:span><text:span text:style-name="T17">s be both “</text:span><text:span text:style-name="T19">the remnant of the Amorites” and “Hivites”?</text:span></text:p>
        </text:list-item>
      </text:list>
      <text:p text:style-name="P11"/>
      <text:list text:continue-numbering="true" text:style-name="L1">
        <text:list-item>
          <text:p text:style-name="P12">In Joshua’s time they were called both “inhabitants of Gibeon” (Gibeonites) and “Hivites”</text:p>
          <text:list>
            <text:list-item>
              <text:p text:style-name="P12">Between that time and before the time of <text:span text:style-name="T20">1 Sa</text:span><text:span text:style-name="T1">muel</text:span><text:span text:style-name="T20"> 22</text:span> they could have intermarried with Amorites that escaped from the battles</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8T14:43:47.396000000</meta:creation-date>
    <meta:editing-duration>PT5H51S</meta:editing-duration>
    <meta:editing-cycles>41</meta:editing-cycles>
    <meta:generator>LibreOffice/25.2.3.2$Windows_X86_64 LibreOffice_project/bbb074479178df812d175f709636b368952c2ce3</meta:generator>
    <dc:title>BibleStudyTemplate</dc:title>
    <dc:date>2025-05-31T14:28:07.923621400</dc:date>
    <meta:document-statistic meta:table-count="8" meta:image-count="0" meta:object-count="0" meta:page-count="3" meta:paragraph-count="19" meta:word-count="1735" meta:character-count="9173" meta:non-whitespace-character-count="7369"/>
    <meta:template xlink:type="simple" xlink:actuate="onRequest" xlink:title="BibleStudyTemplate" xlink:href="../../../../AppData/Roaming/LibreOffice/4/user/template/BibleStudyTemplate.ott" meta:date="2025-05-18T14:43:47.022000000"/>
  </office:meta>
</office:document-meta>
</file>