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ackChancery" svg:font-family="BlackChancery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4132in" fo:margin-left="0.2799in" table:align="left"/>
    </style:style>
    <style:style style:name="Table2.A" style:family="table-column">
      <style:table-column-properties style:column-width="7.4132in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4146in" fo:margin-left="0.2576in" table:align="left"/>
    </style:style>
    <style:style style:name="Table3.A" style:family="table-column">
      <style:table-column-properties style:column-width="7.4146in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3771in" fo:margin-left="0.2806in" table:align="left"/>
    </style:style>
    <style:style style:name="Table4.A" style:family="table-column">
      <style:table-column-properties style:column-width="7.3771in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style:text-underline-style="none" officeooo:rsid="0061fe43" officeooo:paragraph-rsid="00eae2e6"/>
    </style:style>
    <style:style style:name="P2" style:family="paragraph" style:parent-style-name="Standard">
      <style:paragraph-properties fo:text-align="center" style:justify-single-word="false"/>
      <style:text-properties fo:color="#127622" loext:opacity="100%" style:font-name="Gabriela Nerd Font" fo:font-size="11pt" officeooo:rsid="00ebdd8f" officeooo:paragraph-rsid="010c2349" style:font-size-asian="11pt" style:font-size-complex="11pt"/>
    </style:style>
    <style:style style:name="P3" style:family="paragraph" style:parent-style-name="Standard">
      <style:paragraph-properties fo:text-align="left" style:justify-single-word="false"/>
      <style:text-properties officeooo:paragraph-rsid="03110125"/>
    </style:style>
    <style:style style:name="P4" style:family="paragraph" style:parent-style-name="Standard" style:list-style-name="L1">
      <style:paragraph-properties fo:text-align="left" style:justify-single-word="false"/>
      <style:text-properties style:font-name="Liberation Sans" officeooo:rsid="001be314" officeooo:paragraph-rsid="001c092e"/>
    </style:style>
    <style:style style:name="P5" style:family="paragraph" style:parent-style-name="Standard" style:list-style-name="L1">
      <style:paragraph-properties fo:text-align="left" style:justify-single-word="false"/>
      <style:text-properties officeooo:paragraph-rsid="01ba9962"/>
    </style:style>
    <style:style style:name="P6" style:family="paragraph" style:parent-style-name="Standard">
      <style:paragraph-properties fo:text-align="left" style:justify-single-word="false"/>
      <style:text-properties officeooo:paragraph-rsid="01ba9962"/>
    </style:style>
    <style:style style:name="P7" style:family="paragraph" style:parent-style-name="Horizontal_20_Line">
      <style:text-properties fo:font-size="6pt" style:font-size-asian="5.25pt" style:font-size-complex="6pt"/>
    </style:style>
    <style:style style:name="P8" style:family="paragraph" style:parent-style-name="Standard">
      <style:paragraph-properties fo:text-align="left" style:justify-single-word="false"/>
      <style:text-properties officeooo:paragraph-rsid="0021b066"/>
    </style:style>
    <style:style style:name="P9" style:family="paragraph" style:parent-style-name="Standard" style:list-style-name="L1">
      <style:paragraph-properties fo:text-align="left" style:justify-single-word="false"/>
      <style:text-properties style:font-name="Liberation Sans" officeooo:rsid="01a921ba" officeooo:paragraph-rsid="030ffb7f"/>
    </style:style>
    <style:style style:name="P10" style:family="paragraph" style:parent-style-name="Standard" style:list-style-name="L1">
      <style:paragraph-properties fo:text-align="left" style:justify-single-word="false"/>
      <style:text-properties style:font-name="Liberation Sans" officeooo:rsid="0021b066" officeooo:paragraph-rsid="030ffb7f"/>
    </style:style>
    <style:style style:name="P11" style:family="paragraph" style:parent-style-name="Standard">
      <style:paragraph-properties fo:text-align="left" style:justify-single-word="false"/>
      <style:text-properties style:font-name="Liberation Sans" officeooo:rsid="0021b066" officeooo:paragraph-rsid="030ffb7f"/>
    </style:style>
    <style:style style:name="P12" style:family="paragraph" style:parent-style-name="Standard">
      <style:paragraph-properties fo:text-align="left" style:justify-single-word="false"/>
      <style:text-properties officeooo:paragraph-rsid="00238138"/>
    </style:style>
    <style:style style:name="P13" style:family="paragraph" style:parent-style-name="Standard" style:list-style-name="L1">
      <style:paragraph-properties fo:text-align="left" style:justify-single-word="false"/>
      <style:text-properties officeooo:paragraph-rsid="00373cd9"/>
    </style:style>
    <style:style style:name="P14" style:family="paragraph" style:parent-style-name="Standard">
      <style:paragraph-properties fo:text-align="left" style:justify-single-word="false"/>
      <style:text-properties style:font-name="Liberation Sans" officeooo:rsid="023a2bcf" officeooo:paragraph-rsid="00373cd9"/>
    </style:style>
    <style:style style:name="P15" style:family="paragraph" style:parent-style-name="Standard">
      <style:paragraph-properties fo:text-align="left" style:justify-single-word="false"/>
      <style:text-properties style:font-name="Liberation Sans" officeooo:rsid="00373cd9" officeooo:paragraph-rsid="00373cd9"/>
    </style:style>
    <style:style style:name="P16" style:family="paragraph" style:parent-style-name="Standard" style:list-style-name="L1">
      <style:paragraph-properties fo:text-align="left" style:justify-single-word="false"/>
      <style:text-properties officeooo:paragraph-rsid="0037d3dd"/>
    </style:style>
    <style:style style:name="P17" style:family="paragraph" style:parent-style-name="Standard" style:list-style-name="L1">
      <style:paragraph-properties fo:text-align="left" style:justify-single-word="false"/>
      <style:text-properties style:font-name="Liberation Sans" officeooo:rsid="003def3e" officeooo:paragraph-rsid="003def3e"/>
    </style:style>
    <style:style style:name="P18" style:family="paragraph" style:parent-style-name="Standard" style:list-style-name="L1">
      <style:paragraph-properties fo:text-align="left" style:justify-single-word="false"/>
      <style:text-properties officeooo:paragraph-rsid="0114cf45"/>
    </style:style>
    <style:style style:name="P19" style:family="paragraph" style:parent-style-name="Standard" style:list-style-name="L1">
      <style:paragraph-properties fo:text-align="left" style:justify-single-word="false"/>
      <style:text-properties officeooo:paragraph-rsid="011088ef"/>
    </style:style>
    <style:style style:name="P20" style:family="paragraph" style:parent-style-name="Standard" style:list-style-name="L1">
      <style:paragraph-properties fo:text-align="left" style:justify-single-word="false"/>
      <style:text-properties officeooo:rsid="01115ea1" officeooo:paragraph-rsid="01115ea1"/>
    </style:style>
    <style:style style:name="P21" style:family="paragraph" style:parent-style-name="Standard" style:list-style-name="L1">
      <style:paragraph-properties fo:text-align="left" style:justify-single-word="false"/>
      <style:text-properties officeooo:paragraph-rsid="0111c4e9"/>
    </style:style>
    <style:style style:name="P22" style:family="paragraph" style:parent-style-name="Standard" style:list-style-name="L1">
      <style:paragraph-properties fo:text-align="left" style:justify-single-word="false"/>
      <style:text-properties officeooo:paragraph-rsid="0346055e"/>
    </style:style>
    <style:style style:name="P23" style:family="paragraph" style:parent-style-name="Standard" style:list-style-name="L1">
      <style:paragraph-properties fo:text-align="left" style:justify-single-word="false"/>
      <style:text-properties officeooo:paragraph-rsid="0115670e"/>
    </style:style>
    <style:style style:name="P24" style:family="paragraph" style:parent-style-name="Standard" style:list-style-name="L1">
      <style:paragraph-properties fo:text-align="left" style:justify-single-word="false"/>
      <style:text-properties officeooo:paragraph-rsid="01194f9e"/>
    </style:style>
    <style:style style:name="P25" style:family="paragraph" style:parent-style-name="Standard" style:list-style-name="L1">
      <style:paragraph-properties fo:text-align="left" style:justify-single-word="false"/>
      <style:text-properties officeooo:rsid="01cab03c" officeooo:paragraph-rsid="01cab03c"/>
    </style:style>
    <style:style style:name="P26" style:family="paragraph" style:parent-style-name="Standard">
      <style:paragraph-properties fo:text-align="left" style:justify-single-word="false"/>
      <style:text-properties style:font-name="Liberation Sans" officeooo:rsid="034a0d30" officeooo:paragraph-rsid="01cab03c"/>
    </style:style>
    <style:style style:name="P27" style:family="paragraph" style:parent-style-name="Horizontal_20_Line">
      <style:text-properties officeooo:paragraph-rsid="038de82f"/>
    </style:style>
    <style:style style:name="P28" style:family="paragraph" style:parent-style-name="Standard">
      <style:paragraph-properties fo:text-align="left" style:justify-single-word="false"/>
      <style:text-properties officeooo:paragraph-rsid="00457ac4"/>
    </style:style>
    <style:style style:name="P29" style:family="paragraph" style:parent-style-name="Standard" style:list-style-name="L1">
      <style:paragraph-properties fo:text-align="left" style:justify-single-word="false"/>
      <style:text-properties officeooo:paragraph-rsid="0083bfb1"/>
    </style:style>
    <style:style style:name="P30" style:family="paragraph" style:parent-style-name="Standard" style:list-style-name="L1">
      <style:paragraph-properties fo:text-align="left" style:justify-single-word="false"/>
      <style:text-properties officeooo:paragraph-rsid="00ff3d68"/>
    </style:style>
    <style:style style:name="P31" style:family="paragraph" style:parent-style-name="Standard" style:list-style-name="L1">
      <style:paragraph-properties fo:text-align="left" style:justify-single-word="false"/>
      <style:text-properties officeooo:paragraph-rsid="01d6c069"/>
    </style:style>
    <style:style style:name="P32" style:family="paragraph" style:parent-style-name="Standard" style:list-style-name="L1">
      <style:text-properties officeooo:paragraph-rsid="008bc051"/>
    </style:style>
    <style:style style:name="P33" style:family="paragraph" style:parent-style-name="Standard">
      <style:text-properties style:font-name="BlackChancery" fo:font-size="16pt" officeooo:rsid="00650b9c" officeooo:paragraph-rsid="01c3baef" style:font-size-asian="16pt" style:font-size-complex="16pt"/>
    </style:style>
    <style:style style:name="P34" style:family="paragraph" style:parent-style-name="Standard">
      <style:text-properties officeooo:paragraph-rsid="01c3baef"/>
    </style:style>
    <style:style style:name="P35" style:family="paragraph" style:parent-style-name="Standard" style:list-style-name="L1">
      <style:paragraph-properties fo:text-align="left" style:justify-single-word="false"/>
      <style:text-properties officeooo:paragraph-rsid="006866c8"/>
    </style:style>
    <style:style style:name="P36" style:family="paragraph" style:parent-style-name="Standard" style:list-style-name="L1">
      <style:paragraph-properties fo:text-align="left" style:justify-single-word="false"/>
      <style:text-properties officeooo:paragraph-rsid="03513cab"/>
    </style:style>
    <style:style style:name="P37" style:family="paragraph" style:parent-style-name="Standard" style:list-style-name="L1">
      <style:paragraph-properties fo:text-align="left" style:justify-single-word="false"/>
      <style:text-properties officeooo:paragraph-rsid="00704503"/>
    </style:style>
    <style:style style:name="P38" style:family="paragraph" style:parent-style-name="Standard" style:list-style-name="L1">
      <style:paragraph-properties fo:text-align="left" style:justify-single-word="false"/>
      <style:text-properties officeooo:paragraph-rsid="00721a7b"/>
    </style:style>
    <style:style style:name="P39" style:family="paragraph" style:parent-style-name="Standard" style:list-style-name="L1">
      <style:paragraph-properties fo:text-align="left" style:justify-single-word="false"/>
      <style:text-properties officeooo:paragraph-rsid="00d6b83b"/>
    </style:style>
    <style:style style:name="P40" style:family="paragraph" style:parent-style-name="Standard" style:list-style-name="L1"/>
    <style:style style:name="P41" style:family="paragraph" style:parent-style-name="Standard" style:list-style-name="L1">
      <style:paragraph-properties fo:text-align="left" style:justify-single-word="false"/>
      <style:text-properties officeooo:paragraph-rsid="0214eeba"/>
    </style:style>
    <style:style style:name="P42" style:family="paragraph" style:parent-style-name="Standard" style:list-style-name="L1">
      <style:paragraph-properties fo:text-align="left" style:justify-single-word="false"/>
      <style:text-properties officeooo:paragraph-rsid="00da2e2b"/>
    </style:style>
    <style:style style:name="P43" style:family="paragraph" style:parent-style-name="Standard">
      <style:paragraph-properties fo:text-align="left" style:justify-single-word="false"/>
      <style:text-properties officeooo:paragraph-rsid="024ac289"/>
    </style:style>
    <style:style style:name="P44" style:family="paragraph" style:parent-style-name="Standard" style:list-style-name="L1">
      <style:paragraph-properties fo:text-align="left" style:justify-single-word="false"/>
      <style:text-properties officeooo:rsid="010ed736" officeooo:paragraph-rsid="024ac289"/>
    </style:style>
    <style:style style:name="P45" style:family="paragraph" style:parent-style-name="Standard" style:list-style-name="L1">
      <style:paragraph-properties fo:text-align="left" style:justify-single-word="false"/>
      <style:text-properties officeooo:paragraph-rsid="024ac289"/>
    </style:style>
    <style:style style:name="P46" style:family="paragraph" style:parent-style-name="Standard" style:list-style-name="L1">
      <style:paragraph-properties fo:text-align="left" style:justify-single-word="false"/>
      <style:text-properties officeooo:paragraph-rsid="03221651"/>
    </style:style>
    <style:style style:name="P47" style:family="paragraph" style:parent-style-name="Standard" style:list-style-name="L1">
      <style:paragraph-properties fo:text-align="left" style:justify-single-word="false"/>
      <style:text-properties officeooo:paragraph-rsid="0321e479"/>
    </style:style>
    <style:style style:name="P48" style:family="paragraph" style:parent-style-name="Standard">
      <style:paragraph-properties fo:text-align="left" style:justify-single-word="false"/>
      <style:text-properties fo:font-style="normal" officeooo:rsid="0328d37f" officeooo:paragraph-rsid="0328d37f" style:font-style-asian="normal" style:font-style-complex="normal"/>
    </style:style>
    <style:style style:name="P49" style:family="paragraph" style:parent-style-name="Horizontal_20_Line">
      <style:text-properties officeooo:paragraph-rsid="038f351b"/>
    </style:style>
    <style:style style:name="P50" style:family="paragraph" style:parent-style-name="Standard">
      <style:paragraph-properties fo:text-align="left" style:justify-single-word="false"/>
      <style:text-properties officeooo:paragraph-rsid="00757b83"/>
    </style:style>
    <style:style style:name="P51" style:family="paragraph" style:parent-style-name="Standard" style:list-style-name="L1">
      <style:paragraph-properties fo:text-align="left" style:justify-single-word="false"/>
      <style:text-properties officeooo:paragraph-rsid="00757b83"/>
    </style:style>
    <style:style style:name="P52" style:family="paragraph" style:parent-style-name="Standard">
      <style:text-properties style:font-name="Liberation Sans" officeooo:rsid="007ee555"/>
    </style:style>
    <style:style style:name="P53" style:family="paragraph" style:parent-style-name="Horizontal_20_Line">
      <style:text-properties style:font-name="Liberation Sans" officeooo:rsid="007ee555"/>
    </style:style>
    <style:style style:name="P54" style:family="paragraph" style:parent-style-name="Standard">
      <style:paragraph-properties fo:text-align="left" style:justify-single-word="false"/>
      <style:text-properties officeooo:paragraph-rsid="0288349c"/>
    </style:style>
    <style:style style:name="P55" style:family="paragraph" style:parent-style-name="Standard" style:list-style-name="L1">
      <style:paragraph-properties fo:text-align="left" style:justify-single-word="false"/>
      <style:text-properties officeooo:paragraph-rsid="0288349c"/>
    </style:style>
    <style:style style:name="P56" style:family="paragraph" style:parent-style-name="Standard" style:list-style-name="L1">
      <style:paragraph-properties fo:text-align="left" style:justify-single-word="false"/>
      <style:text-properties style:font-name="Liberation Sans" officeooo:rsid="0094f340" officeooo:paragraph-rsid="0288349c"/>
    </style:style>
    <style:style style:name="P57" style:family="paragraph" style:parent-style-name="Standard">
      <style:paragraph-properties fo:text-align="left" style:justify-single-word="false"/>
      <style:text-properties style:font-name="BlackChancery" fo:font-size="16pt" officeooo:rsid="008f8d41" officeooo:paragraph-rsid="024bd42c" style:font-size-asian="16pt" style:font-size-complex="16pt"/>
    </style:style>
    <style:style style:name="P58" style:family="paragraph" style:parent-style-name="Standard">
      <style:paragraph-properties fo:text-align="left" style:justify-single-word="false"/>
      <style:text-properties officeooo:paragraph-rsid="024bd42c"/>
    </style:style>
    <style:style style:name="P59" style:family="paragraph" style:parent-style-name="Standard">
      <style:paragraph-properties fo:text-align="left" style:justify-single-word="false"/>
      <style:text-properties style:font-name="Liberation Sans" officeooo:rsid="027ac3ec" officeooo:paragraph-rsid="024bd42c"/>
    </style:style>
    <style:style style:name="P60" style:family="paragraph" style:parent-style-name="Standard">
      <style:paragraph-properties fo:text-align="left" style:justify-single-word="false"/>
      <style:text-properties officeooo:paragraph-rsid="028efd00"/>
    </style:style>
    <style:style style:name="P61" style:family="paragraph" style:parent-style-name="Table_20_Contents">
      <style:paragraph-properties fo:text-align="left" style:justify-single-word="false"/>
      <style:text-properties officeooo:paragraph-rsid="02530486"/>
    </style:style>
    <style:style style:name="P62" style:family="paragraph" style:parent-style-name="Standard">
      <style:text-properties officeooo:rsid="025bc72a" officeooo:paragraph-rsid="025bc72a"/>
    </style:style>
    <style:style style:name="P63" style:family="paragraph" style:parent-style-name="Standard">
      <style:text-properties officeooo:paragraph-rsid="039397da"/>
    </style:style>
    <style:style style:name="P64" style:family="paragraph" style:parent-style-name="Standard">
      <style:text-properties officeooo:paragraph-rsid="025bc72a"/>
    </style:style>
    <style:style style:name="P65" style:family="paragraph" style:parent-style-name="Standard">
      <style:paragraph-properties fo:text-align="left" style:justify-single-word="false"/>
      <style:text-properties fo:color="#127622" loext:opacity="100%" style:font-name="Gabriela Nerd Font" officeooo:rsid="00373cd9" officeooo:paragraph-rsid="01c11ef3"/>
    </style:style>
    <style:style style:name="P66" style:family="paragraph" style:parent-style-name="Table_20_Contents">
      <style:text-properties officeooo:paragraph-rsid="026b6a7a"/>
    </style:style>
    <style:style style:name="P67" style:family="paragraph" style:parent-style-name="Standard">
      <style:paragraph-properties fo:text-align="left" style:justify-single-word="false"/>
      <style:text-properties style:font-name="Liberation Sans" officeooo:rsid="03666ad5" officeooo:paragraph-rsid="036bd445"/>
    </style:style>
    <style:style style:name="P68" style:family="paragraph" style:parent-style-name="Standard">
      <style:paragraph-properties fo:text-align="left" style:justify-single-word="false"/>
      <style:text-properties style:font-name="Liberation Sans" officeooo:rsid="03760d35" officeooo:paragraph-rsid="03760d35"/>
    </style:style>
    <style:style style:name="P69" style:family="paragraph" style:parent-style-name="Standard">
      <style:paragraph-properties fo:text-align="left" style:justify-single-word="false"/>
      <style:text-properties style:font-name="Liberation Sans" fo:font-style="normal" officeooo:rsid="0379b297" officeooo:paragraph-rsid="03760d35" style:font-style-asian="normal" style:font-style-complex="normal"/>
    </style:style>
    <style:style style:name="P70" style:family="paragraph" style:parent-style-name="Standard">
      <style:paragraph-properties fo:text-align="center" style:justify-single-word="false"/>
      <style:text-properties officeooo:rsid="02b79b8c" officeooo:paragraph-rsid="02b79b8c"/>
    </style:style>
    <style:style style:name="P71" style:family="paragraph" style:parent-style-name="Table_20_Contents">
      <style:paragraph-properties fo:text-align="left" style:justify-single-word="false"/>
      <style:text-properties officeooo:paragraph-rsid="02978f69"/>
    </style:style>
    <style:style style:name="P72" style:family="paragraph" style:parent-style-name="Standard">
      <style:paragraph-properties fo:text-align="left" style:justify-single-word="false"/>
      <style:text-properties fo:color="#127622" loext:opacity="100%" style:font-name="Gabriela Nerd Font" officeooo:rsid="00373cd9" officeooo:paragraph-rsid="02a8a009"/>
    </style:style>
    <style:style style:name="P73" style:family="paragraph" style:parent-style-name="Table_20_Contents">
      <style:paragraph-properties fo:text-align="left" style:justify-single-word="false"/>
      <style:text-properties officeooo:paragraph-rsid="0297fb82"/>
    </style:style>
    <style:style style:name="P74" style:family="paragraph" style:parent-style-name="Standard">
      <style:paragraph-properties fo:text-align="left" style:justify-single-word="false"/>
      <style:text-properties style:font-name="Liberation Sans" officeooo:rsid="007ee555" officeooo:paragraph-rsid="007ee555"/>
    </style:style>
    <style:style style:name="P75" style:family="paragraph" style:parent-style-name="Standard">
      <style:paragraph-properties fo:text-align="left" style:justify-single-word="false"/>
      <style:text-properties officeooo:rsid="037a6c86" officeooo:paragraph-rsid="037a6c86"/>
    </style:style>
    <style:style style:name="P76" style:family="paragraph" style:parent-style-name="Table_20_Contents">
      <style:paragraph-properties fo:text-align="left" style:justify-single-word="false"/>
      <style:text-properties fo:font-size="12pt" style:font-size-asian="12pt" style:font-size-complex="12pt"/>
    </style:style>
    <style:style style:name="P77" style:family="paragraph" style:parent-style-name="Standard">
      <style:paragraph-properties fo:text-align="left" style:justify-single-word="false"/>
      <style:text-properties officeooo:paragraph-rsid="011f6d30"/>
    </style:style>
    <style:style style:name="P78" style:family="paragraph" style:parent-style-name="Standard" style:list-style-name="L1">
      <style:paragraph-properties fo:text-align="left" style:justify-single-word="false"/>
      <style:text-properties officeooo:paragraph-rsid="0134d58c"/>
    </style:style>
    <style:style style:name="P79" style:family="paragraph" style:parent-style-name="Standard" style:list-style-name="L1">
      <style:paragraph-properties fo:text-align="left" style:justify-single-word="false"/>
      <style:text-properties officeooo:paragraph-rsid="012a7379"/>
    </style:style>
    <style:style style:name="P80" style:family="paragraph" style:parent-style-name="Standard" style:list-style-name="L1">
      <style:paragraph-properties fo:text-align="left" style:justify-single-word="false"/>
      <style:text-properties officeooo:rsid="01271f0d" officeooo:paragraph-rsid="012a7379"/>
    </style:style>
    <style:style style:name="P81" style:family="paragraph" style:parent-style-name="Standard" style:list-style-name="L1">
      <style:paragraph-properties fo:text-align="left" style:justify-single-word="false"/>
      <style:text-properties officeooo:paragraph-rsid="01667f84"/>
    </style:style>
    <style:style style:name="P82" style:family="paragraph" style:parent-style-name="Standard" style:list-style-name="L1">
      <style:text-properties officeooo:paragraph-rsid="039b2970"/>
    </style:style>
    <style:style style:name="P83" style:family="paragraph" style:parent-style-name="Table_20_Contents" style:list-style-name="L1">
      <style:paragraph-properties fo:text-align="left" style:justify-single-word="false"/>
      <style:text-properties officeooo:paragraph-rsid="013ea0da"/>
    </style:style>
    <style:style style:name="P84" style:family="paragraph" style:parent-style-name="Standard" style:list-style-name="L2">
      <style:paragraph-properties fo:text-align="left" style:justify-single-word="false"/>
      <style:text-properties officeooo:paragraph-rsid="0130c179"/>
    </style:style>
    <style:style style:name="P85" style:family="paragraph" style:parent-style-name="Standard" style:list-style-name="L2">
      <style:paragraph-properties fo:text-align="left" style:justify-single-word="false"/>
      <style:text-properties officeooo:paragraph-rsid="01389fc3"/>
    </style:style>
    <style:style style:name="P86" style:family="paragraph" style:parent-style-name="Standard" style:list-style-name="L2">
      <style:paragraph-properties fo:text-align="left" style:justify-single-word="false"/>
      <style:text-properties officeooo:paragraph-rsid="0133938b"/>
    </style:style>
    <style:style style:name="P87" style:family="paragraph" style:parent-style-name="Standard" style:list-style-name="L2">
      <style:paragraph-properties fo:text-align="left" style:justify-single-word="false"/>
      <style:text-properties officeooo:paragraph-rsid="013a6c2e"/>
    </style:style>
    <style:style style:name="P88" style:family="paragraph" style:parent-style-name="Standard" style:list-style-name="L2">
      <style:paragraph-properties fo:text-align="left" style:justify-single-word="false"/>
      <style:text-properties officeooo:rsid="03846ea8" officeooo:paragraph-rsid="03846ea8"/>
    </style:style>
    <style:style style:name="P89" style:family="paragraph" style:parent-style-name="Standard" style:list-style-name="L2">
      <style:paragraph-properties fo:text-align="left" style:justify-single-word="false"/>
      <style:text-properties officeooo:paragraph-rsid="03872739"/>
    </style:style>
    <style:style style:name="P90" style:family="paragraph" style:parent-style-name="Horizontal_20_Line">
      <style:text-properties style:font-name="Liberation Sans" officeooo:rsid="007ee555" officeooo:paragraph-rsid="03f36a36"/>
    </style:style>
    <style:style style:name="P91" style:family="paragraph" style:parent-style-name="Standard">
      <style:paragraph-properties fo:text-align="left" style:justify-single-word="false"/>
      <style:text-properties officeooo:rsid="03f41635" officeooo:paragraph-rsid="03f41635"/>
    </style:style>
    <style:style style:name="P92" style:family="paragraph" style:parent-style-name="Standard" style:list-style-name="L3">
      <style:paragraph-properties fo:text-align="left" style:justify-single-word="false"/>
      <style:text-properties officeooo:rsid="03ff764a" officeooo:paragraph-rsid="03ff764a"/>
    </style:style>
    <style:style style:name="P93" style:family="paragraph" style:parent-style-name="Standard" style:list-style-name="L3">
      <style:paragraph-properties fo:text-align="left" style:justify-single-word="false"/>
      <style:text-properties officeooo:rsid="03f41635" officeooo:paragraph-rsid="03f41635"/>
    </style:style>
    <style:style style:name="P94" style:family="paragraph" style:parent-style-name="Standard" style:list-style-name="L3">
      <style:paragraph-properties fo:text-align="left" style:justify-single-word="false"/>
      <style:text-properties officeooo:rsid="03f64499" officeooo:paragraph-rsid="03f64499"/>
    </style:style>
    <style:style style:name="P95" style:family="paragraph" style:parent-style-name="Standard" style:list-style-name="L3">
      <style:paragraph-properties fo:text-align="left" style:justify-single-word="false"/>
      <style:text-properties officeooo:rsid="03f9c032" officeooo:paragraph-rsid="03f9c032"/>
    </style:style>
    <style:style style:name="P96" style:family="paragraph" style:parent-style-name="Standard" style:list-style-name="L3">
      <style:paragraph-properties fo:text-align="left" style:justify-single-word="false"/>
      <style:text-properties officeooo:rsid="03fbd70f" officeooo:paragraph-rsid="03fbd70f"/>
    </style:style>
    <style:style style:name="P97" style:family="paragraph" style:parent-style-name="Standard" style:list-style-name="L3">
      <style:paragraph-properties fo:text-align="left" style:justify-single-word="false"/>
      <style:text-properties officeooo:rsid="041493bf" officeooo:paragraph-rsid="041493bf"/>
    </style:style>
    <style:style style:name="P98" style:family="paragraph" style:parent-style-name="Standard" style:list-style-name="L3">
      <style:paragraph-properties fo:text-align="left" style:justify-single-word="false"/>
      <style:text-properties officeooo:rsid="0414952f" officeooo:paragraph-rsid="0414952f"/>
    </style:style>
    <style:style style:name="P99" style:family="paragraph" style:parent-style-name="Standard" style:list-style-name="L3">
      <style:paragraph-properties fo:text-align="left" style:justify-single-word="false"/>
      <style:text-properties officeooo:rsid="041755e7" officeooo:paragraph-rsid="041755e7"/>
    </style:style>
    <style:style style:name="P100" style:family="paragraph" style:parent-style-name="Standard" style:list-style-name="L3">
      <style:paragraph-properties fo:text-align="left" style:justify-single-word="false"/>
      <style:text-properties officeooo:rsid="041a0d17" officeooo:paragraph-rsid="041a1b19"/>
    </style:style>
    <style:style style:name="P101" style:family="paragraph" style:parent-style-name="Standard" style:list-style-name="L3">
      <style:paragraph-properties fo:text-align="left" style:justify-single-word="false"/>
      <style:text-properties officeooo:rsid="041a0d17" officeooo:paragraph-rsid="041a0d17"/>
    </style:style>
    <style:style style:name="P102" style:family="paragraph" style:parent-style-name="Standard" style:list-style-name="L3">
      <style:paragraph-properties fo:text-align="left" style:justify-single-word="false"/>
      <style:text-properties officeooo:rsid="0429d6ed" officeooo:paragraph-rsid="0429d6ed"/>
    </style:style>
    <style:style style:name="P103" style:family="paragraph" style:parent-style-name="Standard" style:list-style-name="L3">
      <style:paragraph-properties fo:text-align="left" style:justify-single-word="false"/>
      <style:text-properties officeooo:rsid="041bd0a6" officeooo:paragraph-rsid="041bd0a6"/>
    </style:style>
    <style:style style:name="P104" style:family="paragraph" style:parent-style-name="Standard" style:list-style-name="L3">
      <style:paragraph-properties fo:text-align="left" style:justify-single-word="false"/>
      <style:text-properties officeooo:paragraph-rsid="041dc761"/>
    </style:style>
    <style:style style:name="P105" style:family="paragraph" style:parent-style-name="Standard" style:list-style-name="L3">
      <style:paragraph-properties fo:text-align="left" style:justify-single-word="false"/>
      <style:text-properties officeooo:rsid="042f7c5c" officeooo:paragraph-rsid="042f7c5c"/>
    </style:style>
    <style:style style:name="P106" style:family="paragraph" style:parent-style-name="Standard" style:list-style-name="L3">
      <style:paragraph-properties fo:text-align="left" style:justify-single-word="false"/>
      <style:text-properties officeooo:rsid="0431cdee" officeooo:paragraph-rsid="0431cdee"/>
    </style:style>
    <style:style style:name="P107" style:family="paragraph" style:parent-style-name="Standard">
      <style:paragraph-properties fo:text-align="left" style:justify-single-word="false"/>
      <style:text-properties officeooo:paragraph-rsid="01214d99"/>
    </style:style>
    <style:style style:name="P108" style:family="paragraph" style:parent-style-name="Standard" style:list-style-name="L1">
      <style:paragraph-properties fo:text-align="left" style:justify-single-word="false"/>
      <style:text-properties officeooo:paragraph-rsid="014eec27"/>
    </style:style>
    <style:style style:name="P109" style:family="paragraph" style:parent-style-name="Standard" style:list-style-name="L1">
      <style:paragraph-properties fo:text-align="left" style:justify-single-word="false"/>
      <style:text-properties officeooo:paragraph-rsid="014a37af"/>
    </style:style>
    <style:style style:name="P110" style:family="paragraph" style:parent-style-name="Standard" style:list-style-name="L1">
      <style:paragraph-properties fo:text-align="left" style:justify-single-word="false"/>
      <style:text-properties officeooo:paragraph-rsid="014adecd"/>
    </style:style>
    <style:style style:name="P111" style:family="paragraph" style:parent-style-name="Standard" style:list-style-name="L1">
      <style:paragraph-properties fo:text-align="left" style:justify-single-word="false"/>
      <style:text-properties officeooo:paragraph-rsid="014dc19f"/>
    </style:style>
    <style:style style:name="P112" style:family="paragraph" style:parent-style-name="Standard" style:list-style-name="L1">
      <style:text-properties officeooo:rsid="01885471" officeooo:paragraph-rsid="03a16e36"/>
    </style:style>
    <style:style style:name="P113" style:family="paragraph" style:parent-style-name="Standard" style:list-style-name="L1">
      <style:text-properties fo:font-style="normal" officeooo:rsid="03a70afb" officeooo:paragraph-rsid="03a70afb" style:font-style-asian="normal" style:font-style-complex="normal"/>
    </style:style>
    <style:style style:name="P114" style:family="paragraph" style:parent-style-name="Standard" style:list-style-name="L1">
      <style:text-properties fo:font-style="normal" officeooo:rsid="03a8acf7" officeooo:paragraph-rsid="03a8acf7" style:font-style-asian="normal" style:font-style-complex="normal"/>
    </style:style>
    <style:style style:name="P115" style:family="paragraph" style:parent-style-name="Standard" style:list-style-name="L1">
      <style:text-properties fo:font-style="normal" officeooo:rsid="03a97a6b" officeooo:paragraph-rsid="03a97a6b" style:font-style-asian="normal" style:font-style-complex="normal"/>
    </style:style>
    <style:style style:name="P116" style:family="paragraph" style:parent-style-name="Standard" style:list-style-name="L1">
      <style:text-properties fo:font-style="normal" officeooo:rsid="03a54c71" officeooo:paragraph-rsid="03a54c71" style:font-style-asian="normal" style:font-style-complex="normal"/>
    </style:style>
    <style:style style:name="P117" style:family="paragraph" style:parent-style-name="Standard" style:list-style-name="L1">
      <style:text-properties officeooo:rsid="0189e6ba" officeooo:paragraph-rsid="01a00fa3"/>
    </style:style>
    <style:style style:name="P118" style:family="paragraph" style:parent-style-name="Standard" style:list-style-name="L1">
      <style:text-properties fo:font-style="normal" officeooo:rsid="03ab0dba" officeooo:paragraph-rsid="03ab0dba" style:font-style-asian="normal" style:font-style-complex="normal"/>
    </style:style>
    <style:style style:name="P119" style:family="paragraph" style:parent-style-name="Standard" style:list-style-name="L1">
      <style:text-properties fo:font-style="normal" officeooo:rsid="03ad2721" officeooo:paragraph-rsid="03ad2721" style:font-style-asian="normal" style:font-style-complex="normal"/>
    </style:style>
    <style:style style:name="P120" style:family="paragraph" style:parent-style-name="Standard" style:list-style-name="L1">
      <style:text-properties fo:font-style="normal" officeooo:rsid="02f5da3f" officeooo:paragraph-rsid="02f5da3f" style:font-style-asian="normal" style:font-style-complex="normal"/>
    </style:style>
    <style:style style:name="P121" style:family="paragraph" style:parent-style-name="Standard" style:list-style-name="L1">
      <style:text-properties fo:font-style="normal" officeooo:rsid="03af8d10" officeooo:paragraph-rsid="03af8d10" style:font-style-asian="normal" style:font-style-complex="normal"/>
    </style:style>
    <style:style style:name="P122" style:family="paragraph" style:parent-style-name="Standard" style:list-style-name="L1">
      <style:text-properties fo:font-style="normal" officeooo:rsid="03affc02" officeooo:paragraph-rsid="03affc02" style:font-style-asian="normal" style:font-style-complex="normal"/>
    </style:style>
    <style:style style:name="P123" style:family="paragraph" style:parent-style-name="Standard" style:list-style-name="L1">
      <style:text-properties fo:font-style="normal" officeooo:rsid="03c806ea" officeooo:paragraph-rsid="03c806ea" style:font-style-asian="normal" style:font-style-complex="normal"/>
    </style:style>
    <style:style style:name="P124" style:family="paragraph" style:parent-style-name="Standard" style:list-style-name="L1">
      <style:text-properties fo:font-style="normal" officeooo:rsid="02ecfa29" officeooo:paragraph-rsid="02ecfa29" style:font-style-asian="normal" style:font-style-complex="normal"/>
    </style:style>
    <style:style style:name="P125" style:family="paragraph" style:parent-style-name="Standard" style:list-style-name="L1">
      <style:text-properties fo:font-style="normal" officeooo:rsid="03b0d9d1" officeooo:paragraph-rsid="03b0d9d1" style:font-style-asian="normal" style:font-style-complex="normal"/>
    </style:style>
    <style:style style:name="P126" style:family="paragraph" style:parent-style-name="Standard" style:list-style-name="L1">
      <style:text-properties fo:font-style="normal" officeooo:rsid="02eec5a2" officeooo:paragraph-rsid="02eec5a2" style:font-style-asian="normal" style:font-style-complex="normal"/>
    </style:style>
    <style:style style:name="P127" style:family="paragraph" style:parent-style-name="Standard" style:list-style-name="L1">
      <style:text-properties fo:font-style="normal" officeooo:rsid="03c65783" officeooo:paragraph-rsid="03c65783" style:font-style-asian="normal" style:font-style-complex="normal"/>
    </style:style>
    <style:style style:name="P128" style:family="paragraph" style:parent-style-name="Standard" style:list-style-name="L1">
      <style:text-properties fo:font-style="normal" officeooo:rsid="02f1d5fd" officeooo:paragraph-rsid="02f1d5fd" style:font-style-asian="normal" style:font-style-complex="normal"/>
    </style:style>
    <style:style style:name="P129" style:family="paragraph" style:parent-style-name="Standard" style:list-style-name="L1">
      <style:text-properties fo:font-style="normal" officeooo:rsid="018e67ed" officeooo:paragraph-rsid="01a00fa3" style:font-style-asian="normal" style:font-style-complex="normal"/>
    </style:style>
    <style:style style:name="P130" style:family="paragraph" style:parent-style-name="Standard" style:list-style-name="L1">
      <style:text-properties officeooo:rsid="018a96db" officeooo:paragraph-rsid="01a12651"/>
    </style:style>
    <style:style style:name="P131" style:family="paragraph" style:parent-style-name="Standard" style:list-style-name="L1">
      <style:text-properties fo:font-style="normal" officeooo:rsid="0189e6ba" officeooo:paragraph-rsid="01a3174c" style:font-style-asian="normal" style:font-style-complex="normal"/>
    </style:style>
    <style:style style:name="P132" style:family="paragraph" style:parent-style-name="Standard" style:list-style-name="L1">
      <style:text-properties officeooo:rsid="0189e6ba" officeooo:paragraph-rsid="02f5e060"/>
    </style:style>
    <style:style style:name="P133" style:family="paragraph" style:parent-style-name="Standard" style:list-style-name="L1">
      <style:text-properties officeooo:rsid="03b29d5a" officeooo:paragraph-rsid="03b29d5a"/>
    </style:style>
    <style:style style:name="P134" style:family="paragraph" style:parent-style-name="Standard" style:list-style-name="L1">
      <style:text-properties officeooo:rsid="03cb2429" officeooo:paragraph-rsid="03cb2429"/>
    </style:style>
    <style:style style:name="P135" style:family="paragraph" style:parent-style-name="Standard" style:list-style-name="L1">
      <style:text-properties fo:font-style="normal" officeooo:rsid="01922b16" officeooo:paragraph-rsid="01a3174c" style:font-style-asian="normal" style:font-style-complex="normal"/>
    </style:style>
    <style:style style:name="P136" style:family="paragraph" style:parent-style-name="Standard" style:list-style-name="L1">
      <style:text-properties officeooo:rsid="0189e6ba" officeooo:paragraph-rsid="01a3174c"/>
    </style:style>
    <style:style style:name="P137" style:family="paragraph" style:parent-style-name="Standard" style:list-style-name="L1">
      <style:text-properties fo:font-style="normal" officeooo:rsid="019416ad" officeooo:paragraph-rsid="01a3174c" style:font-style-asian="normal" style:font-style-complex="normal"/>
    </style:style>
    <style:style style:name="P138" style:family="paragraph" style:parent-style-name="Standard" style:list-style-name="L1">
      <style:text-properties fo:font-style="normal" officeooo:rsid="02f8928c" officeooo:paragraph-rsid="02f8928c" style:font-style-asian="normal" style:font-style-complex="normal"/>
    </style:style>
    <style:style style:name="P139" style:family="paragraph" style:parent-style-name="Standard" style:list-style-name="L1">
      <style:text-properties fo:font-style="normal" officeooo:rsid="03cd22c9" officeooo:paragraph-rsid="03cd22c9" style:font-style-asian="normal" style:font-style-complex="normal"/>
    </style:style>
    <style:style style:name="P140" style:family="paragraph" style:parent-style-name="Standard" style:list-style-name="L1">
      <style:text-properties fo:font-style="normal" officeooo:rsid="03ce1f0d" officeooo:paragraph-rsid="03ce1f0d" style:font-style-asian="normal" style:font-style-complex="normal"/>
    </style:style>
    <style:style style:name="P141" style:family="paragraph" style:parent-style-name="Standard" style:list-style-name="L1">
      <style:text-properties fo:font-style="normal" officeooo:rsid="03cf523e" officeooo:paragraph-rsid="03cf523e" style:font-style-asian="normal" style:font-style-complex="normal"/>
    </style:style>
    <style:style style:name="P142" style:family="paragraph" style:parent-style-name="Standard" style:list-style-name="L1">
      <style:text-properties fo:font-style="normal" officeooo:rsid="0198ea3b" officeooo:paragraph-rsid="01a3174c" style:font-style-asian="normal" style:font-style-complex="normal"/>
    </style:style>
    <style:style style:name="P143" style:family="paragraph" style:parent-style-name="Standard" style:list-style-name="L1">
      <style:text-properties fo:font-style="normal" officeooo:rsid="0192f170" officeooo:paragraph-rsid="01a3174c" style:font-style-asian="normal" style:font-style-complex="normal"/>
    </style:style>
    <style:style style:name="P144" style:family="paragraph" style:parent-style-name="Standard" style:list-style-name="L1">
      <style:text-properties fo:font-style="normal" officeooo:rsid="02fc6b99" officeooo:paragraph-rsid="02fc6b99" style:font-style-asian="normal" style:font-style-complex="normal"/>
    </style:style>
    <style:style style:name="P145" style:family="paragraph" style:parent-style-name="Standard" style:list-style-name="L1">
      <style:text-properties fo:font-style="normal" officeooo:rsid="03d242ad" officeooo:paragraph-rsid="03d242ad" style:font-style-asian="normal" style:font-style-complex="normal"/>
    </style:style>
    <style:style style:name="P146" style:family="paragraph" style:parent-style-name="Standard" style:list-style-name="L1">
      <style:text-properties fo:font-style="normal" officeooo:rsid="03d2e98f" officeooo:paragraph-rsid="03d2e98f" style:font-style-asian="normal" style:font-style-complex="normal"/>
    </style:style>
    <style:style style:name="P147" style:family="paragraph" style:parent-style-name="Standard" style:list-style-name="L1">
      <style:text-properties fo:font-style="normal" officeooo:rsid="02fcdd24" officeooo:paragraph-rsid="02fcdd24" style:font-style-asian="normal" style:font-style-complex="normal"/>
    </style:style>
    <style:style style:name="P148" style:family="paragraph" style:parent-style-name="Standard" style:list-style-name="L1">
      <style:text-properties fo:font-style="normal" officeooo:rsid="0197b7e5" officeooo:paragraph-rsid="01a4b068" style:font-style-asian="normal" style:font-style-complex="normal"/>
    </style:style>
    <style:style style:name="P149" style:family="paragraph" style:parent-style-name="Standard" style:list-style-name="L1">
      <style:text-properties fo:font-style="normal" officeooo:rsid="0198ea3b" officeooo:paragraph-rsid="01a6a590" style:font-style-asian="normal" style:font-style-complex="normal"/>
    </style:style>
    <style:style style:name="P150" style:family="paragraph" style:parent-style-name="Standard" style:list-style-name="L1">
      <style:text-properties fo:font-style="normal" officeooo:rsid="03d7c4c5" officeooo:paragraph-rsid="03d7c4c5" style:font-style-asian="normal" style:font-style-complex="normal"/>
    </style:style>
    <style:style style:name="P151" style:family="paragraph" style:parent-style-name="Standard" style:list-style-name="L1">
      <style:text-properties officeooo:rsid="0189e6ba" officeooo:paragraph-rsid="01a6a590"/>
    </style:style>
    <style:style style:name="P152" style:family="paragraph" style:parent-style-name="Standard" style:list-style-name="L1">
      <style:text-properties fo:font-style="normal" officeooo:rsid="02ff2022" officeooo:paragraph-rsid="02ff2022" style:font-style-asian="normal" style:font-style-complex="normal"/>
    </style:style>
    <style:style style:name="P153" style:family="paragraph" style:parent-style-name="Standard" style:list-style-name="L1">
      <style:text-properties fo:font-style="normal" officeooo:rsid="03033064" officeooo:paragraph-rsid="03033064" style:font-style-asian="normal" style:font-style-complex="normal"/>
    </style:style>
    <style:style style:name="P154" style:family="paragraph" style:parent-style-name="Standard" style:list-style-name="L1">
      <style:text-properties fo:font-style="normal" officeooo:rsid="019e6be2" officeooo:paragraph-rsid="01a6a590" style:font-style-asian="normal" style:font-style-complex="normal"/>
    </style:style>
    <style:style style:name="P155" style:family="paragraph" style:parent-style-name="Standard" style:list-style-name="L1">
      <style:text-properties fo:font-style="normal" officeooo:rsid="03e2a567" officeooo:paragraph-rsid="03e2a567" style:font-style-asian="normal" style:font-style-complex="normal"/>
    </style:style>
    <style:style style:name="P156" style:family="paragraph" style:parent-style-name="Standard" style:list-style-name="L1">
      <style:text-properties fo:font-style="normal" officeooo:rsid="03e629eb" officeooo:paragraph-rsid="03e629eb" style:font-style-asian="normal" style:font-style-complex="normal"/>
    </style:style>
    <style:style style:name="P157" style:family="paragraph" style:parent-style-name="Standard" style:list-style-name="L1">
      <style:text-properties fo:font-style="normal" officeooo:rsid="03e9f63d" officeooo:paragraph-rsid="03e9f63d" style:font-style-asian="normal" style:font-style-complex="normal"/>
    </style:style>
    <style:style style:name="P158" style:family="paragraph" style:parent-style-name="Standard" style:list-style-name="L1">
      <style:text-properties fo:font-style="normal" officeooo:rsid="0306d294" officeooo:paragraph-rsid="0306d294" style:font-style-asian="normal" style:font-style-complex="normal"/>
    </style:style>
    <style:style style:name="T1" style:family="text">
      <style:text-properties style:font-name="BlackChancery" fo:font-size="16pt" style:font-size-asian="16pt" style:font-size-complex="16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a88d51"/>
    </style:style>
    <style:style style:name="T4" style:family="text">
      <style:text-properties officeooo:rsid="043c46fd"/>
    </style:style>
    <style:style style:name="T5" style:family="text">
      <style:text-properties style:font-name="BlackChancery" fo:font-size="16pt" officeooo:rsid="001be314" style:font-size-asian="16pt" style:font-size-complex="16pt"/>
    </style:style>
    <style:style style:name="T6" style:family="text">
      <style:text-properties style:font-name="Gabriela Nerd Font" officeooo:rsid="001be314"/>
    </style:style>
    <style:style style:name="T7" style:family="text">
      <style:text-properties officeooo:rsid="01b8bea5"/>
    </style:style>
    <style:style style:name="T8" style:family="text">
      <style:text-properties officeooo:rsid="01ba55f8"/>
    </style:style>
    <style:style style:name="T9" style:family="text">
      <style:text-properties officeooo:rsid="01c8398b"/>
    </style:style>
    <style:style style:name="T10" style:family="text">
      <style:text-properties officeooo:rsid="01ba9962"/>
    </style:style>
    <style:style style:name="T11" style:family="text">
      <style:text-properties officeooo:rsid="00ebdd8f"/>
    </style:style>
    <style:style style:name="T12" style:family="text">
      <style:text-properties fo:color="#127622" loext:opacity="100%" style:font-name="Gabriela Nerd Font" officeooo:rsid="00ebdd8f"/>
    </style:style>
    <style:style style:name="T13" style:family="text">
      <style:text-properties officeooo:rsid="01bd6104"/>
    </style:style>
    <style:style style:name="T14" style:family="text">
      <style:text-properties officeooo:rsid="01c60068"/>
    </style:style>
    <style:style style:name="T15" style:family="text">
      <style:text-properties officeooo:rsid="00ecdd18"/>
    </style:style>
    <style:style style:name="T16" style:family="text">
      <style:text-properties officeooo:rsid="033fc8d3"/>
    </style:style>
    <style:style style:name="T17" style:family="text">
      <style:text-properties officeooo:rsid="01c617a7"/>
    </style:style>
    <style:style style:name="T18" style:family="text">
      <style:text-properties officeooo:rsid="001e2b1a"/>
    </style:style>
    <style:style style:name="T19" style:family="text">
      <style:text-properties officeooo:rsid="00af90e8"/>
    </style:style>
    <style:style style:name="T20" style:family="text">
      <style:text-properties officeooo:rsid="00202aba"/>
    </style:style>
    <style:style style:name="T21" style:family="text">
      <style:text-properties officeooo:rsid="01d15b3f"/>
    </style:style>
    <style:style style:name="T22" style:family="text">
      <style:text-properties style:font-name="BlackChancery" fo:font-size="16pt" officeooo:rsid="0021b066" style:font-size-asian="16pt" style:font-size-complex="16pt"/>
    </style:style>
    <style:style style:name="T23" style:family="text">
      <style:text-properties style:font-name="Gabriela Nerd Font" officeooo:rsid="0021b066"/>
    </style:style>
    <style:style style:name="T24" style:family="text">
      <style:text-properties style:font-name="BlackChancery" fo:font-size="16pt" officeooo:rsid="02390ba0" style:font-size-asian="16pt" style:font-size-complex="16pt"/>
    </style:style>
    <style:style style:name="T25" style:family="text">
      <style:text-properties style:font-name="Gabriela Nerd Font" officeooo:rsid="00238138"/>
    </style:style>
    <style:style style:name="T26" style:family="text">
      <style:text-properties style:font-name="Gabriela Nerd Font" officeooo:rsid="02384f2c"/>
    </style:style>
    <style:style style:name="T27" style:family="text">
      <style:text-properties style:font-name="Liberation Sans" officeooo:rsid="02384f2c"/>
    </style:style>
    <style:style style:name="T28" style:family="text">
      <style:text-properties style:font-name="Liberation Sans" officeooo:rsid="02390ba0"/>
    </style:style>
    <style:style style:name="T29" style:family="text">
      <style:text-properties fo:color="#127622" loext:opacity="100%" style:font-name="Gabriela Nerd Font" officeooo:rsid="00373cd9"/>
    </style:style>
    <style:style style:name="T30" style:family="text">
      <style:text-properties style:font-name="Liberation Sans" officeooo:rsid="0239de51"/>
    </style:style>
    <style:style style:name="T31" style:family="text">
      <style:text-properties style:font-name="Liberation Sans" officeooo:rsid="023a2bcf"/>
    </style:style>
    <style:style style:name="T32" style:family="text">
      <style:text-properties style:font-name="Liberation Sans" officeooo:rsid="0341b188"/>
    </style:style>
    <style:style style:name="T33" style:family="text">
      <style:text-properties style:font-name="Liberation Sans" officeooo:rsid="03417854"/>
    </style:style>
    <style:style style:name="T34" style:family="text">
      <style:text-properties style:font-name="Liberation Sans" officeooo:rsid="023a7301"/>
    </style:style>
    <style:style style:name="T35" style:family="text">
      <style:text-properties style:font-name="Liberation Sans" officeooo:rsid="034262cc"/>
    </style:style>
    <style:style style:name="T36" style:family="text">
      <style:text-properties style:font-name="Gabriela Nerd Font"/>
    </style:style>
    <style:style style:name="T37" style:family="text">
      <style:text-properties style:font-name="Liberation Sans" officeooo:rsid="0113b156"/>
    </style:style>
    <style:style style:name="T38" style:family="text">
      <style:text-properties style:font-name="Liberation Sans" officeooo:rsid="00373cd9"/>
    </style:style>
    <style:style style:name="T39" style:family="text">
      <style:text-properties style:font-name="Liberation Sans" officeooo:rsid="004eb376"/>
    </style:style>
    <style:style style:name="T40" style:family="text">
      <style:text-properties style:font-name="Liberation Sans" officeooo:rsid="00bb4366"/>
    </style:style>
    <style:style style:name="T41" style:family="text">
      <style:text-properties style:font-name="Liberation Sans" officeooo:rsid="0037d3dd"/>
    </style:style>
    <style:style style:name="T42" style:family="text">
      <style:text-properties style:font-name="Liberation Sans" officeooo:rsid="004f2e59"/>
    </style:style>
    <style:style style:name="T43" style:family="text">
      <style:text-properties style:font-name="Liberation Sans" officeooo:rsid="0039d7e3"/>
    </style:style>
    <style:style style:name="T44" style:family="text">
      <style:text-properties style:font-name="Liberation Sans" officeooo:rsid="004f64ca"/>
    </style:style>
    <style:style style:name="T45" style:family="text">
      <style:text-properties fo:color="#127622" loext:opacity="100%" style:font-name="Liberation Sans" officeooo:rsid="0039d7e3"/>
    </style:style>
    <style:style style:name="T46" style:family="text">
      <style:text-properties style:font-name="Liberation Sans" officeooo:rsid="0343408f"/>
    </style:style>
    <style:style style:name="T47" style:family="text">
      <style:text-properties officeooo:rsid="005141d5"/>
    </style:style>
    <style:style style:name="T48" style:family="text">
      <style:text-properties officeooo:rsid="00820fb3"/>
    </style:style>
    <style:style style:name="T49" style:family="text">
      <style:text-properties officeooo:rsid="00fd29de"/>
    </style:style>
    <style:style style:name="T50" style:family="text">
      <style:text-properties style:font-name="Liberation Sans" officeooo:rsid="003ff5bb"/>
    </style:style>
    <style:style style:name="T51" style:family="text">
      <style:text-properties fo:color="#ff0000" loext:opacity="100%" style:font-name="Liberation Sans" officeooo:rsid="00525f93"/>
    </style:style>
    <style:style style:name="T52" style:family="text">
      <style:text-properties style:font-name="Liberation Sans" officeooo:rsid="00525f93"/>
    </style:style>
    <style:style style:name="T53" style:family="text">
      <style:text-properties style:font-name="Liberation Sans" officeooo:rsid="03444ce1"/>
    </style:style>
    <style:style style:name="T54" style:family="text">
      <style:text-properties style:font-name="Liberation Sans" officeooo:rsid="011088ef"/>
    </style:style>
    <style:style style:name="T55" style:family="text">
      <style:text-properties style:font-name="Liberation Sans" officeooo:rsid="011088ef" fo:background-color="#ffff00" loext:char-shading-value="0"/>
    </style:style>
    <style:style style:name="T56" style:family="text">
      <style:text-properties style:font-name="Liberation Sans" officeooo:rsid="01115ea1"/>
    </style:style>
    <style:style style:name="T57" style:family="text">
      <style:text-properties fo:color="#127622" loext:opacity="100%" style:font-name="Gabriela Nerd Font" officeooo:rsid="01115ea1"/>
    </style:style>
    <style:style style:name="T58" style:family="text">
      <style:text-properties style:font-name="Liberation Sans" officeooo:rsid="0111a5ec"/>
    </style:style>
    <style:style style:name="T59" style:family="text">
      <style:text-properties fo:color="#127622" loext:opacity="100%" style:font-name="Gabriela Nerd Font" officeooo:rsid="011c0858"/>
    </style:style>
    <style:style style:name="T60" style:family="text">
      <style:text-properties style:font-name="Liberation Sans"/>
    </style:style>
    <style:style style:name="T61" style:family="text">
      <style:text-properties style:font-name="Liberation Sans" officeooo:rsid="0118036c"/>
    </style:style>
    <style:style style:name="T62" style:family="text">
      <style:text-properties style:font-name="Liberation Sans" officeooo:rsid="01ad1774"/>
    </style:style>
    <style:style style:name="T63" style:family="text">
      <style:text-properties style:font-name="Liberation Sans" officeooo:rsid="0111c4e9"/>
    </style:style>
    <style:style style:name="T64" style:family="text">
      <style:text-properties style:font-name="Liberation Sans" officeooo:rsid="03448b14"/>
    </style:style>
    <style:style style:name="T65" style:family="text">
      <style:text-properties style:font-name="Liberation Sans" officeooo:rsid="0346055e"/>
    </style:style>
    <style:style style:name="T66" style:family="text">
      <style:text-properties fo:color="#127622" loext:opacity="100%" style:font-name="Liberation Sans" officeooo:rsid="0346055e"/>
    </style:style>
    <style:style style:name="T67" style:family="text">
      <style:text-properties style:font-name="Liberation Sans" officeooo:rsid="0111c4e9" fo:background-color="#ffff00" loext:char-shading-value="0"/>
    </style:style>
    <style:style style:name="T68" style:family="text">
      <style:text-properties style:font-name="Liberation Sans" officeooo:rsid="0115670e"/>
    </style:style>
    <style:style style:name="T69" style:family="text">
      <style:text-properties style:font-name="Liberation Sans" officeooo:rsid="034876f2"/>
    </style:style>
    <style:style style:name="T70" style:family="text">
      <style:text-properties style:font-name="Liberation Sans" officeooo:rsid="0116b9ed"/>
    </style:style>
    <style:style style:name="T71" style:family="text">
      <style:text-properties style:font-name="Liberation Sans" officeooo:rsid="011adaa0"/>
    </style:style>
    <style:style style:name="T72" style:family="text">
      <style:text-properties style:font-name="Liberation Sans" officeooo:rsid="011adaa0" fo:background-color="#ffff00" loext:char-shading-value="0"/>
    </style:style>
    <style:style style:name="T73" style:family="text">
      <style:text-properties style:font-name="Liberation Sans" officeooo:rsid="01cbea4e"/>
    </style:style>
    <style:style style:name="T74" style:family="text">
      <style:text-properties style:font-name="Liberation Sans" officeooo:rsid="02206972"/>
    </style:style>
    <style:style style:name="T75" style:family="text">
      <style:text-properties style:font-name="Liberation Sans" officeooo:rsid="01cc17bf"/>
    </style:style>
    <style:style style:name="T76" style:family="text">
      <style:text-properties style:font-name="Liberation Sans" style:text-underline-style="solid" style:text-underline-width="auto" style:text-underline-color="font-color"/>
    </style:style>
    <style:style style:name="T77" style:family="text">
      <style:text-properties style:font-name="Liberation Sans" officeooo:rsid="034a0d30"/>
    </style:style>
    <style:style style:name="T78" style:family="text">
      <style:text-properties style:font-name="BlackChancery" fo:font-size="16pt" officeooo:rsid="00457ac4" style:font-size-asian="16pt" style:font-size-complex="16pt"/>
    </style:style>
    <style:style style:name="T79" style:family="text">
      <style:text-properties style:font-name="Gabriela Nerd Font" officeooo:rsid="00457ac4"/>
    </style:style>
    <style:style style:name="T80" style:family="text">
      <style:text-properties style:font-name="Gabriela Nerd Font" officeooo:rsid="0240b7ab"/>
    </style:style>
    <style:style style:name="T81" style:family="text">
      <style:text-properties style:font-name="Gabriela Nerd Font" officeooo:rsid="00542cc7"/>
    </style:style>
    <style:style style:name="T82" style:family="text">
      <style:text-properties style:font-name="Gabriela Nerd Font" officeooo:rsid="0047751a"/>
    </style:style>
    <style:style style:name="T83" style:family="text">
      <style:text-properties style:font-name="Gabriela Nerd Font" officeooo:rsid="0048a99b"/>
    </style:style>
    <style:style style:name="T84" style:family="text">
      <style:text-properties style:font-name="Gabriela Nerd Font" officeooo:rsid="004b8685"/>
    </style:style>
    <style:style style:name="T85" style:family="text">
      <style:text-properties style:font-name="Liberation Sans" officeooo:rsid="00457ac4"/>
    </style:style>
    <style:style style:name="T86" style:family="text">
      <style:text-properties style:font-name="Liberation Sans" officeooo:rsid="008727cf"/>
    </style:style>
    <style:style style:name="T87" style:family="text">
      <style:text-properties style:font-name="Liberation Sans" officeooo:rsid="0048a99b"/>
    </style:style>
    <style:style style:name="T88" style:family="text">
      <style:text-properties style:font-name="Liberation Sans" officeooo:rsid="0083bfb1"/>
    </style:style>
    <style:style style:name="T89" style:family="text">
      <style:text-properties officeooo:rsid="0087f17a"/>
    </style:style>
    <style:style style:name="T90" style:family="text">
      <style:text-properties style:font-name="Liberation Sans" officeooo:rsid="0056a763"/>
    </style:style>
    <style:style style:name="T91" style:family="text">
      <style:text-properties style:font-name="Liberation Sans" officeooo:rsid="006068d4"/>
    </style:style>
    <style:style style:name="T92" style:family="text">
      <style:text-properties style:font-name="Liberation Sans" officeooo:rsid="0085e437"/>
    </style:style>
    <style:style style:name="T93" style:family="text">
      <style:text-properties style:font-name="Liberation Sans" officeooo:rsid="0085fbba"/>
    </style:style>
    <style:style style:name="T94" style:family="text">
      <style:text-properties style:font-name="Liberation Sans" officeooo:rsid="01d6c069"/>
    </style:style>
    <style:style style:name="T95" style:family="text">
      <style:text-properties style:font-name="Liberation Sans" officeooo:rsid="0088be30"/>
    </style:style>
    <style:style style:name="T96" style:family="text">
      <style:text-properties style:font-name="Liberation Sans" officeooo:rsid="024227bf"/>
    </style:style>
    <style:style style:name="T97" style:family="text">
      <style:text-properties style:font-name="Liberation Sans" officeooo:rsid="0061c103"/>
    </style:style>
    <style:style style:name="T98" style:family="text">
      <style:text-properties style:font-name="Liberation Sans" officeooo:rsid="0063510c"/>
    </style:style>
    <style:style style:name="T99" style:family="text">
      <style:text-properties style:font-name="BlackChancery" fo:font-size="16pt" officeooo:rsid="00650b9c" style:font-size-asian="16pt" style:font-size-complex="16pt"/>
    </style:style>
    <style:style style:name="T100" style:family="text">
      <style:text-properties style:font-name="Gabriela Nerd Font" officeooo:rsid="006866c8"/>
    </style:style>
    <style:style style:name="T101" style:family="text">
      <style:text-properties style:font-name="Gabriela Nerd Font" officeooo:rsid="033f6edf"/>
    </style:style>
    <style:style style:name="T102" style:family="text">
      <style:text-properties style:font-name="Liberation Sans" officeooo:rsid="006866c8"/>
    </style:style>
    <style:style style:name="T103" style:family="text">
      <style:text-properties style:font-name="Liberation Sans" officeooo:rsid="00704503"/>
    </style:style>
    <style:style style:name="T104" style:family="text">
      <style:text-properties fo:color="#ff0000" loext:opacity="100%" style:font-name="Liberation Sans" officeooo:rsid="006866c8"/>
    </style:style>
    <style:style style:name="T105" style:family="text">
      <style:text-properties style:font-name="Liberation Sans" officeooo:rsid="0068bacd"/>
    </style:style>
    <style:style style:name="T106" style:family="text">
      <style:text-properties style:font-name="Liberation Sans" officeooo:rsid="006e52ce"/>
    </style:style>
    <style:style style:name="T107" style:family="text">
      <style:text-properties style:font-name="Liberation Sans" officeooo:rsid="006bdcba"/>
    </style:style>
    <style:style style:name="T108" style:family="text">
      <style:text-properties style:font-name="Liberation Sans" officeooo:rsid="01002075"/>
    </style:style>
    <style:style style:name="T109" style:family="text">
      <style:text-properties style:font-name="Liberation Sans" fo:font-style="italic" officeooo:rsid="006bdcba" style:font-style-asian="italic" style:font-style-complex="italic"/>
    </style:style>
    <style:style style:name="T110" style:family="text">
      <style:text-properties style:font-name="Liberation Sans" officeooo:rsid="034bca94"/>
    </style:style>
    <style:style style:name="T111" style:family="text">
      <style:text-properties fo:color="#127622" loext:opacity="100%" style:font-name="Liberation Sans" officeooo:rsid="034bca94"/>
    </style:style>
    <style:style style:name="T112" style:family="text">
      <style:text-properties style:font-name="Liberation Sans" officeooo:rsid="034c9a7b"/>
    </style:style>
    <style:style style:name="T113" style:family="text">
      <style:text-properties style:font-name="Liberation Sans" officeooo:rsid="034cad68"/>
    </style:style>
    <style:style style:name="T114" style:family="text">
      <style:text-properties fo:color="#127622" loext:opacity="100%" style:font-name="Liberation Sans" officeooo:rsid="034cad68"/>
    </style:style>
    <style:style style:name="T115" style:family="text">
      <style:text-properties fo:color="#127622" loext:opacity="100%" style:font-name="Liberation Sans" officeooo:rsid="034db5fd"/>
    </style:style>
    <style:style style:name="T116" style:family="text">
      <style:text-properties style:font-name="Liberation Sans" officeooo:rsid="034db5fd"/>
    </style:style>
    <style:style style:name="T117" style:family="text">
      <style:text-properties fo:color="#ff0000" loext:opacity="100%" style:font-name="Liberation Sans" officeooo:rsid="00704503"/>
    </style:style>
    <style:style style:name="T118" style:family="text">
      <style:text-properties style:font-name="Liberation Sans" officeooo:rsid="02452393"/>
    </style:style>
    <style:style style:name="T119" style:family="text">
      <style:text-properties style:font-name="Liberation Sans" officeooo:rsid="00721a7b"/>
    </style:style>
    <style:style style:name="T120" style:family="text">
      <style:text-properties style:font-name="Liberation Sans" officeooo:rsid="008176a2"/>
    </style:style>
    <style:style style:name="T121" style:family="text">
      <style:text-properties style:font-name="Liberation Sans" officeooo:rsid="00725c0c"/>
    </style:style>
    <style:style style:name="T122" style:family="text">
      <style:text-properties style:font-name="Liberation Sans" officeooo:rsid="0081ab28"/>
    </style:style>
    <style:style style:name="T123" style:family="text">
      <style:text-properties style:font-name="Liberation Sans" officeooo:rsid="0072d842"/>
    </style:style>
    <style:style style:name="T124" style:family="text">
      <style:text-properties fo:color="#ff0000" loext:opacity="100%"/>
    </style:style>
    <style:style style:name="T125" style:family="text">
      <style:text-properties fo:color="#ff0000" loext:opacity="100%" style:font-name="Liberation Sans" officeooo:rsid="00725c0c"/>
    </style:style>
    <style:style style:name="T126" style:family="text">
      <style:text-properties fo:color="#ff0000" loext:opacity="100%" style:font-name="Liberation Sans" officeooo:rsid="00725c0c" fo:background-color="#ffff00" loext:char-shading-value="0"/>
    </style:style>
    <style:style style:name="T127" style:family="text">
      <style:text-properties style:font-name="Liberation Sans" officeooo:rsid="0212ef9d"/>
    </style:style>
    <style:style style:name="T128" style:family="text">
      <style:text-properties style:font-name="Liberation Sans" officeooo:rsid="021b63a2"/>
    </style:style>
    <style:style style:name="T129" style:family="text">
      <style:text-properties style:font-name="Liberation Sans" officeooo:rsid="0214eeba"/>
    </style:style>
    <style:style style:name="T130" style:family="text">
      <style:text-properties style:font-name="Liberation Sans" officeooo:rsid="00beb8da"/>
    </style:style>
    <style:style style:name="T131" style:family="text">
      <style:text-properties style:font-name="Liberation Sans" officeooo:rsid="00bd3501"/>
    </style:style>
    <style:style style:name="T132" style:family="text">
      <style:text-properties style:font-name="Liberation Sans" officeooo:rsid="01e13699"/>
    </style:style>
    <style:style style:name="T133" style:family="text">
      <style:text-properties style:font-name="Liberation Sans" officeooo:rsid="00de13de"/>
    </style:style>
    <style:style style:name="T134" style:family="text">
      <style:text-properties style:font-name="Liberation Sans" officeooo:rsid="00cf53d4"/>
    </style:style>
    <style:style style:name="T135" style:family="text">
      <style:text-properties style:font-name="Liberation Sans" officeooo:rsid="00d832b1"/>
    </style:style>
    <style:style style:name="T136" style:family="text">
      <style:text-properties style:font-name="Liberation Sans" officeooo:rsid="00c053de"/>
    </style:style>
    <style:style style:name="T137" style:family="text">
      <style:text-properties style:font-name="Liberation Sans" officeooo:rsid="00c36471"/>
    </style:style>
    <style:style style:name="T138" style:family="text">
      <style:text-properties style:font-name="Liberation Sans" fo:font-style="italic" officeooo:rsid="00c36471" style:font-style-asian="italic" style:font-style-complex="italic"/>
    </style:style>
    <style:style style:name="T139" style:family="text">
      <style:text-properties style:font-name="Liberation Sans" officeooo:rsid="00d945a4"/>
    </style:style>
    <style:style style:name="T140" style:family="text">
      <style:text-properties style:font-name="Liberation Sans" officeooo:rsid="00c533e0"/>
    </style:style>
    <style:style style:name="T141" style:family="text">
      <style:text-properties style:font-name="Liberation Sans" officeooo:rsid="02185ea3"/>
    </style:style>
    <style:style style:name="T142" style:family="text">
      <style:text-properties style:font-name="Liberation Sans" officeooo:rsid="0247a4f8"/>
    </style:style>
    <style:style style:name="T143" style:family="text">
      <style:text-properties style:font-name="Liberation Sans" officeooo:rsid="00da2e2b"/>
    </style:style>
    <style:style style:name="T144" style:family="text">
      <style:text-properties style:font-name="Liberation Sans" officeooo:rsid="00d3b0db"/>
    </style:style>
    <style:style style:name="T145" style:family="text">
      <style:text-properties style:font-name="Liberation Sans" officeooo:rsid="00d299b9"/>
    </style:style>
    <style:style style:name="T146" style:family="text">
      <style:text-properties style:font-name="Liberation Sans" officeooo:rsid="00d522b6"/>
    </style:style>
    <style:style style:name="T147" style:family="text">
      <style:text-properties style:font-name="Liberation Sans" officeooo:rsid="00d1950b"/>
    </style:style>
    <style:style style:name="T148" style:family="text">
      <style:text-properties style:font-name="Liberation Sans" officeooo:rsid="0352e9c7"/>
    </style:style>
    <style:style style:name="T149" style:family="text">
      <style:text-properties style:font-name="Liberation Sans" officeooo:rsid="00db2d08"/>
    </style:style>
    <style:style style:name="T150" style:family="text">
      <style:text-properties style:font-name="Liberation Sans" officeooo:rsid="01aff6d3"/>
    </style:style>
    <style:style style:name="T151" style:family="text">
      <style:text-properties style:font-name="Liberation Sans" officeooo:rsid="01b0975e"/>
    </style:style>
    <style:style style:name="T152" style:family="text">
      <style:text-properties style:font-name="Liberation Sans" officeooo:rsid="03536870"/>
    </style:style>
    <style:style style:name="T153" style:family="text">
      <style:text-properties style:font-name="Liberation Sans" officeooo:rsid="0354af2c"/>
    </style:style>
    <style:style style:name="T154" style:family="text">
      <style:text-properties style:font-name="Liberation Sans" fo:font-style="italic" officeooo:rsid="0354af2c" style:font-style-asian="italic" style:font-style-complex="italic"/>
    </style:style>
    <style:style style:name="T155" style:family="text">
      <style:text-properties style:font-name="Liberation Sans" fo:font-style="normal" officeooo:rsid="0354af2c" style:font-style-asian="normal" style:font-style-complex="normal"/>
    </style:style>
    <style:style style:name="T156" style:family="text">
      <style:text-properties fo:color="#127622" loext:opacity="100%" style:font-name="Liberation Sans" fo:font-style="normal" officeooo:rsid="0354af2c" style:font-style-asian="normal" style:font-style-complex="normal"/>
    </style:style>
    <style:style style:name="T157" style:family="text">
      <style:text-properties style:font-name="BlackChancery" fo:font-size="16pt" officeooo:rsid="008f8d41" style:font-size-asian="16pt" style:font-size-complex="16pt"/>
    </style:style>
    <style:style style:name="T158" style:family="text">
      <style:text-properties style:font-name="Gabriela Nerd Font" fo:font-style="normal" officeooo:rsid="010ed736" style:font-style-asian="normal" style:font-style-complex="normal"/>
    </style:style>
    <style:style style:name="T159" style:family="text">
      <style:text-properties style:font-name="Gabriela Nerd Font" fo:font-style="normal" officeooo:rsid="015adfd5" style:font-style-asian="normal" style:font-style-complex="normal"/>
    </style:style>
    <style:style style:name="T160" style:family="text">
      <style:text-properties style:font-name="Liberation Sans" fo:font-style="normal" officeooo:rsid="0320df1b" style:font-style-asian="normal" style:font-style-complex="normal"/>
    </style:style>
    <style:style style:name="T161" style:family="text">
      <style:text-properties style:font-name="Liberation Sans" fo:font-style="normal" officeooo:rsid="0323d016" style:font-style-asian="normal" style:font-style-complex="normal"/>
    </style:style>
    <style:style style:name="T162" style:family="text">
      <style:text-properties style:font-name="Liberation Sans" fo:font-style="normal" officeooo:rsid="03221651" style:font-style-asian="normal" style:font-style-complex="normal"/>
    </style:style>
    <style:style style:name="T163" style:family="text">
      <style:text-properties style:font-name="Liberation Sans" fo:font-style="normal" officeooo:rsid="03573154" style:font-style-asian="normal" style:font-style-complex="normal"/>
    </style:style>
    <style:style style:name="T164" style:family="text">
      <style:text-properties style:font-name="Liberation Sans" fo:font-style="normal" officeooo:rsid="043d0336" style:font-style-asian="normal" style:font-style-complex="normal"/>
    </style:style>
    <style:style style:name="T165" style:family="text">
      <style:text-properties style:font-name="Liberation Sans" fo:font-style="normal" officeooo:rsid="010ed736" style:font-style-asian="normal" style:font-style-complex="normal"/>
    </style:style>
    <style:style style:name="T166" style:family="text">
      <style:text-properties style:font-name="Liberation Sans" fo:font-style="normal" officeooo:rsid="010ed736" fo:background-color="#ffff00" loext:char-shading-value="0" style:font-style-asian="normal" style:font-style-complex="normal"/>
    </style:style>
    <style:style style:name="T167" style:family="text">
      <style:text-properties style:font-name="Liberation Sans" fo:font-style="normal" officeooo:rsid="010ed736" fo:background-color="#fff5ce" loext:char-shading-value="0" style:font-style-asian="normal" style:font-style-complex="normal"/>
    </style:style>
    <style:style style:name="T168" style:family="text">
      <style:text-properties style:font-name="Liberation Sans" fo:font-style="normal" officeooo:rsid="010ed736" fo:background-color="#ffdbb6" loext:char-shading-value="0" style:font-style-asian="normal" style:font-style-complex="normal"/>
    </style:style>
    <style:style style:name="T169" style:family="text">
      <style:text-properties style:font-name="Liberation Sans" fo:font-style="normal" officeooo:rsid="035978f7" style:font-style-asian="normal" style:font-style-complex="normal"/>
    </style:style>
    <style:style style:name="T170" style:family="text">
      <style:text-properties style:font-name="Liberation Sans" fo:font-style="normal" officeooo:rsid="0324f400" style:font-style-asian="normal" style:font-style-complex="normal"/>
    </style:style>
    <style:style style:name="T171" style:family="text">
      <style:text-properties style:font-name="Liberation Sans" fo:font-style="normal" officeooo:rsid="035a5cb8" style:font-style-asian="normal" style:font-style-complex="normal"/>
    </style:style>
    <style:style style:name="T172" style:family="text">
      <style:text-properties style:font-name="Liberation Sans" fo:font-style="normal" officeooo:rsid="0322636e" style:font-style-asian="normal" style:font-style-complex="normal"/>
    </style:style>
    <style:style style:name="T173" style:family="text">
      <style:text-properties fo:font-style="normal" officeooo:rsid="031da9f7" style:font-style-asian="normal" style:font-style-complex="normal"/>
    </style:style>
    <style:style style:name="T174" style:family="text">
      <style:text-properties fo:font-style="normal" officeooo:rsid="0321e479" style:font-style-asian="normal" style:font-style-complex="normal"/>
    </style:style>
    <style:style style:name="T175" style:family="text">
      <style:text-properties fo:color="#127622" loext:opacity="100%" style:font-name="Gabriela Nerd Font" officeooo:rsid="0356198e"/>
    </style:style>
    <style:style style:name="T176" style:family="text">
      <style:text-properties fo:color="#127622" loext:opacity="100%" style:font-name="Gabriela Nerd Font" fo:font-style="normal" officeooo:rsid="0321e479" style:font-style-asian="normal" style:font-style-complex="normal"/>
    </style:style>
    <style:style style:name="T177" style:family="text">
      <style:text-properties fo:color="#127622" loext:opacity="100%" style:font-name="Gabriela Nerd Font" fo:font-style="normal" officeooo:rsid="03571a0d" style:font-style-asian="normal" style:font-style-complex="normal"/>
    </style:style>
    <style:style style:name="T178" style:family="text">
      <style:text-properties style:font-name="BlackChancery" fo:font-size="16pt" officeooo:rsid="00757b83" style:font-size-asian="16pt" style:font-size-complex="16pt"/>
    </style:style>
    <style:style style:name="T179" style:family="text">
      <style:text-properties style:font-name="Gabriela Nerd Font" officeooo:rsid="00757b83"/>
    </style:style>
    <style:style style:name="T180" style:family="text">
      <style:text-properties style:font-name="Liberation Sans" officeooo:rsid="008d6ce5"/>
    </style:style>
    <style:style style:name="T181" style:family="text">
      <style:text-properties style:font-name="Liberation Sans" officeooo:rsid="00757b83"/>
    </style:style>
    <style:style style:name="T182" style:family="text">
      <style:text-properties style:font-name="Liberation Sans" officeooo:rsid="035a62a4"/>
    </style:style>
    <style:style style:name="T183" style:family="text">
      <style:text-properties style:font-name="Liberation Sans" officeooo:rsid="0076d9c5"/>
    </style:style>
    <style:style style:name="T184" style:family="text">
      <style:text-properties style:font-name="Liberation Sans" officeooo:rsid="00765ad1"/>
    </style:style>
    <style:style style:name="T185" style:family="text">
      <style:text-properties style:font-name="Liberation Sans" officeooo:rsid="02098323"/>
    </style:style>
    <style:style style:name="T186" style:family="text">
      <style:text-properties style:font-name="Liberation Sans" officeooo:rsid="0077ae0a"/>
    </style:style>
    <style:style style:name="T187" style:family="text">
      <style:text-properties style:font-name="Liberation Sans" officeooo:rsid="01e2f35b"/>
    </style:style>
    <style:style style:name="T188" style:family="text">
      <style:text-properties style:font-name="Liberation Sans" officeooo:rsid="0078eb06"/>
    </style:style>
    <style:style style:name="T189" style:family="text">
      <style:text-properties style:font-name="Liberation Sans" officeooo:rsid="00797fb2"/>
    </style:style>
    <style:style style:name="T190" style:family="text">
      <style:text-properties style:font-name="Liberation Sans" officeooo:rsid="007ee555"/>
    </style:style>
    <style:style style:name="T191" style:family="text">
      <style:text-properties style:font-name="Liberation Sans" officeooo:rsid="02001d6b"/>
    </style:style>
    <style:style style:name="T192" style:family="text">
      <style:text-properties style:font-name="Liberation Sans" officeooo:rsid="0206da25"/>
    </style:style>
    <style:style style:name="T193" style:family="text">
      <style:text-properties style:font-name="Liberation Sans" officeooo:rsid="01e4f534"/>
    </style:style>
    <style:style style:name="T194" style:family="text">
      <style:text-properties style:font-name="Liberation Sans" officeooo:rsid="007fc199"/>
    </style:style>
    <style:style style:name="T195" style:family="text">
      <style:text-properties style:font-name="Liberation Sans" officeooo:rsid="01f780b1"/>
    </style:style>
    <style:style style:name="T196" style:family="text">
      <style:text-properties style:font-name="Liberation Sans" officeooo:rsid="02066f84"/>
    </style:style>
    <style:style style:name="T197" style:family="text">
      <style:text-properties style:font-name="Liberation Sans" officeooo:rsid="0204b8da"/>
    </style:style>
    <style:style style:name="T198" style:family="text">
      <style:text-properties style:font-name="Liberation Sans" fo:font-style="italic" officeooo:rsid="0204b8da" style:font-style-asian="italic" style:font-style-complex="italic"/>
    </style:style>
    <style:style style:name="T199" style:family="text">
      <style:text-properties style:font-name="Liberation Sans" officeooo:rsid="01f9ed83"/>
    </style:style>
    <style:style style:name="T200" style:family="text">
      <style:text-properties style:text-position="super 58%"/>
    </style:style>
    <style:style style:name="T201" style:family="text">
      <style:text-properties style:font-name="Liberation Sans" officeooo:rsid="0207ae48"/>
    </style:style>
    <style:style style:name="T202" style:family="text">
      <style:text-properties style:font-name="Liberation Sans" officeooo:rsid="01f9caa8"/>
    </style:style>
    <style:style style:name="T203" style:family="text">
      <style:text-properties style:text-position="super 58%" style:font-name="Liberation Sans" officeooo:rsid="01f9ed83"/>
    </style:style>
    <style:style style:name="T204" style:family="text">
      <style:text-properties style:font-name="Liberation Sans" officeooo:rsid="01fcd592"/>
    </style:style>
    <style:style style:name="T205" style:family="text">
      <style:text-properties style:text-position="0% 100%" style:font-name="Liberation Sans" officeooo:rsid="01f9ed83"/>
    </style:style>
    <style:style style:name="T206" style:family="text">
      <style:text-properties style:text-position="0% 100%" style:font-name="Liberation Sans" officeooo:rsid="01fbafd9"/>
    </style:style>
    <style:style style:name="T207" style:family="text">
      <style:text-properties style:font-name="Gabriela Nerd Font" officeooo:rsid="008f8d41"/>
    </style:style>
    <style:style style:name="T208" style:family="text">
      <style:text-properties style:font-name="Gabriela Nerd Font" officeooo:rsid="0105d558"/>
    </style:style>
    <style:style style:name="T209" style:family="text">
      <style:text-properties style:font-name="Liberation Sans" officeooo:rsid="00913e60"/>
    </style:style>
    <style:style style:name="T210" style:family="text">
      <style:text-properties style:font-name="Liberation Sans" officeooo:rsid="0094f340"/>
    </style:style>
    <style:style style:name="T211" style:family="text">
      <style:text-properties style:font-name="Liberation Sans" officeooo:rsid="02273b4a"/>
    </style:style>
    <style:style style:name="T212" style:family="text">
      <style:text-properties style:font-name="Liberation Sans" officeooo:rsid="009accc0"/>
    </style:style>
    <style:style style:name="T213" style:family="text">
      <style:text-properties style:font-name="Liberation Sans" fo:font-weight="bold" officeooo:rsid="00a69cc6" style:font-weight-asian="bold" style:font-weight-complex="bold"/>
    </style:style>
    <style:style style:name="T214" style:family="text">
      <style:text-properties style:font-name="Liberation Sans" officeooo:rsid="00a69cc6"/>
    </style:style>
    <style:style style:name="T215" style:family="text">
      <style:text-properties style:font-name="Liberation Sans" officeooo:rsid="035b5db2"/>
    </style:style>
    <style:style style:name="T216" style:family="text">
      <style:text-properties style:font-name="Liberation Sans" fo:font-style="italic" officeooo:rsid="01b185ac" style:font-style-asian="italic" style:font-style-complex="italic"/>
    </style:style>
    <style:style style:name="T217" style:family="text">
      <style:text-properties style:font-name="Liberation Sans" fo:font-style="normal" officeooo:rsid="009accc0" style:font-style-asian="normal" style:font-style-complex="normal"/>
    </style:style>
    <style:style style:name="T218" style:family="text">
      <style:text-properties style:font-name="Liberation Sans" fo:font-style="normal" officeooo:rsid="009b5454" style:font-style-asian="normal" style:font-style-complex="normal"/>
    </style:style>
    <style:style style:name="T219" style:family="text">
      <style:text-properties style:font-name="Liberation Sans" fo:font-style="normal" officeooo:rsid="035e13d4" style:font-style-asian="normal" style:font-style-complex="normal"/>
    </style:style>
    <style:style style:name="T220" style:family="text">
      <style:text-properties style:font-name="Liberation Sans" fo:font-style="normal" officeooo:rsid="035b5db2" style:font-style-asian="normal" style:font-style-complex="normal"/>
    </style:style>
    <style:style style:name="T221" style:family="text">
      <style:text-properties style:font-name="Liberation Sans" fo:font-style="normal" officeooo:rsid="03601110" style:font-style-asian="normal" style:font-style-complex="normal"/>
    </style:style>
    <style:style style:name="T222" style:family="text">
      <style:text-properties style:font-name="Liberation Sans" fo:font-style="normal" officeooo:rsid="035c660d" style:font-style-asian="normal" style:font-style-complex="normal"/>
    </style:style>
    <style:style style:name="T223" style:family="text">
      <style:text-properties fo:color="#127622" loext:opacity="100%" style:font-name="Liberation Sans" fo:font-style="normal" officeooo:rsid="035c660d" style:font-style-asian="normal" style:font-style-complex="normal"/>
    </style:style>
    <style:style style:name="T224" style:family="text">
      <style:text-properties style:font-name="Liberation Sans" fo:font-style="normal" officeooo:rsid="01edadfd" style:font-style-asian="normal" style:font-style-complex="normal"/>
    </style:style>
    <style:style style:name="T225" style:family="text">
      <style:text-properties style:font-name="Liberation Sans" fo:font-style="normal" officeooo:rsid="009baf7c" style:font-style-asian="normal" style:font-style-complex="normal"/>
    </style:style>
    <style:style style:name="T226" style:family="text">
      <style:text-properties style:font-name="Liberation Sans" fo:font-style="normal" officeooo:rsid="009cba9e" style:font-style-asian="normal" style:font-style-complex="normal"/>
    </style:style>
    <style:style style:name="T227" style:family="text">
      <style:text-properties fo:font-style="normal" officeooo:rsid="009f32f0" style:font-style-asian="normal" style:font-style-complex="normal"/>
    </style:style>
    <style:style style:name="T228" style:family="text">
      <style:text-properties fo:font-style="italic" officeooo:rsid="009f32f0" style:font-style-asian="italic" style:font-style-complex="italic"/>
    </style:style>
    <style:style style:name="T229" style:family="text">
      <style:text-properties fo:font-style="italic" style:text-underline-style="solid" style:text-underline-width="auto" style:text-underline-color="font-color" officeooo:rsid="009f32f0" style:font-style-asian="italic" style:font-style-complex="italic"/>
    </style:style>
    <style:style style:name="T230" style:family="text">
      <style:text-properties fo:color="#127622" loext:opacity="100%" fo:font-style="normal" officeooo:rsid="03623006" style:font-style-asian="normal" style:font-style-complex="normal"/>
    </style:style>
    <style:style style:name="T231" style:family="text">
      <style:text-properties fo:font-style="normal" officeooo:rsid="03623006" style:font-style-asian="normal" style:font-style-complex="normal"/>
    </style:style>
    <style:style style:name="T232" style:family="text">
      <style:text-properties style:font-name="Liberation Sans" officeooo:rsid="024bd42c"/>
    </style:style>
    <style:style style:name="T233" style:family="text">
      <style:text-properties style:font-name="Liberation Sans" officeooo:rsid="032b82c0"/>
    </style:style>
    <style:style style:name="T234" style:family="text">
      <style:text-properties style:font-name="Liberation Sans" officeooo:rsid="032cf8a1"/>
    </style:style>
    <style:style style:name="T235" style:family="text">
      <style:text-properties fo:font-size="10pt" style:font-size-asian="10pt" style:font-size-complex="10pt"/>
    </style:style>
    <style:style style:name="T236" style:family="text">
      <style:text-properties fo:color="#127622" loext:opacity="100%" style:font-name="Gabriela Nerd Font" fo:font-size="10pt" officeooo:rsid="00373cd9" style:font-size-asian="10pt" style:font-size-complex="10pt"/>
    </style:style>
    <style:style style:name="T237" style:family="text">
      <style:text-properties fo:color="#127622" loext:opacity="100%" style:font-name="Gabriela Nerd Font" fo:font-size="10pt" officeooo:rsid="028efd00" style:font-size-asian="10pt" style:font-size-complex="10pt"/>
    </style:style>
    <style:style style:name="T238" style:family="text">
      <style:text-properties fo:color="#127622" loext:opacity="100%" style:font-name="Gabriela Nerd Font" fo:font-size="10pt" officeooo:rsid="0290eadd" style:font-size-asian="10pt" style:font-size-complex="10pt"/>
    </style:style>
    <style:style style:name="T239" style:family="text">
      <style:text-properties fo:background-color="#ffaa95" loext:char-shading-value="0"/>
    </style:style>
    <style:style style:name="T240" style:family="text">
      <style:text-properties fo:background-color="#ffff00" loext:char-shading-value="0"/>
    </style:style>
    <style:style style:name="T241" style:family="text">
      <style:text-properties fo:color="#c9211e" loext:opacity="100%"/>
    </style:style>
    <style:style style:name="T242" style:family="text">
      <style:text-properties fo:color="#c9211e" loext:opacity="100%" fo:background-color="#ffff00" loext:char-shading-value="0"/>
    </style:style>
    <style:style style:name="T243" style:family="text">
      <style:text-properties fo:color="#c9211e" loext:opacity="100%" fo:background-color="#fff5ce" loext:char-shading-value="0"/>
    </style:style>
    <style:style style:name="T244" style:family="text">
      <style:text-properties officeooo:rsid="025bc72a"/>
    </style:style>
    <style:style style:name="T245" style:family="text">
      <style:text-properties officeooo:rsid="025c1e5e"/>
    </style:style>
    <style:style style:name="T246" style:family="text">
      <style:text-properties officeooo:rsid="025cf66d"/>
    </style:style>
    <style:style style:name="T247" style:family="text">
      <style:text-properties officeooo:rsid="0265c084"/>
    </style:style>
    <style:style style:name="T248" style:family="text">
      <style:text-properties fo:font-weight="bold" officeooo:rsid="0265c084" style:font-weight-asian="bold" style:font-weight-complex="bold"/>
    </style:style>
    <style:style style:name="T249" style:family="text">
      <style:text-properties officeooo:rsid="02bcf931"/>
    </style:style>
    <style:style style:name="T250" style:family="text">
      <style:text-properties officeooo:rsid="02cce8ca"/>
    </style:style>
    <style:style style:name="T251" style:family="text">
      <style:text-properties officeooo:rsid="02bef5f1"/>
    </style:style>
    <style:style style:name="T252" style:family="text">
      <style:text-properties officeooo:rsid="0266b91a"/>
    </style:style>
    <style:style style:name="T253" style:family="text">
      <style:text-properties officeooo:rsid="032ff7c7"/>
    </style:style>
    <style:style style:name="T254" style:family="text">
      <style:text-properties officeooo:rsid="0266429b"/>
    </style:style>
    <style:style style:name="T255" style:family="text">
      <style:text-properties officeooo:rsid="02676981"/>
    </style:style>
    <style:style style:name="T256" style:family="text">
      <style:text-properties officeooo:rsid="02694f3b"/>
    </style:style>
    <style:style style:name="T257" style:family="text">
      <style:text-properties officeooo:rsid="026af2d9"/>
    </style:style>
    <style:style style:name="T258" style:family="text">
      <style:text-properties officeooo:rsid="036358b6"/>
    </style:style>
    <style:style style:name="T259" style:family="text">
      <style:text-properties officeooo:rsid="03650260"/>
    </style:style>
    <style:style style:name="T260" style:family="text">
      <style:text-properties fo:font-style="italic" officeooo:rsid="036358b6" style:font-style-asian="italic" style:font-style-complex="italic"/>
    </style:style>
    <style:style style:name="T261" style:family="text">
      <style:text-properties style:text-underline-style="solid" style:text-underline-width="auto" style:text-underline-color="font-color" fo:background-color="#ffdbb6" loext:char-shading-value="0"/>
    </style:style>
    <style:style style:name="T262" style:family="text">
      <style:text-properties fo:background-color="#ffdbb6" loext:char-shading-value="0"/>
    </style:style>
    <style:style style:name="T263" style:family="text">
      <style:text-properties fo:background-color="#fff5ce" loext:char-shading-value="0"/>
    </style:style>
    <style:style style:name="T2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5" style:family="text">
      <style:text-properties fo:font-style="normal" officeooo:rsid="0377ee6d" style:font-style-asian="normal" style:font-style-complex="normal"/>
    </style:style>
    <style:style style:name="T266" style:family="text">
      <style:text-properties fo:font-style="normal" officeooo:rsid="0379b297" style:font-style-asian="normal" style:font-style-complex="normal"/>
    </style:style>
    <style:style style:name="T267" style:family="text">
      <style:text-properties officeooo:rsid="02d36b2e"/>
    </style:style>
    <style:style style:name="T268" style:family="text">
      <style:text-properties officeooo:rsid="029953ff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background-color="#ffffd7" loext:char-shading-value="0"/>
    </style:style>
    <style:style style:name="T271" style:family="text">
      <style:text-properties fo:background-color="#f7d1d5" loext:char-shading-value="0"/>
    </style:style>
    <style:style style:name="T272" style:family="text">
      <style:text-properties fo:background-color="#dedce6" loext:char-shading-value="0"/>
    </style:style>
    <style:style style:name="T273" style:family="text">
      <style:text-properties fo:background-color="#dee7e5" loext:char-shading-value="0"/>
    </style:style>
    <style:style style:name="T274" style:family="text">
      <style:text-properties fo:background-color="#bf819e" loext:char-shading-value="0"/>
    </style:style>
    <style:style style:name="T275" style:family="text">
      <style:text-properties fo:background-color="#81aca6" loext:char-shading-value="0"/>
    </style:style>
    <style:style style:name="T276" style:family="text">
      <style:text-properties fo:background-color="#ffd7d7" loext:char-shading-value="0"/>
    </style:style>
    <style:style style:name="T277" style:family="text">
      <style:text-properties fo:background-color="#e0c2cd" loext:char-shading-value="0"/>
    </style:style>
    <style:style style:name="T278" style:family="text">
      <style:text-properties fo:background-color="#dde8cb" loext:char-shading-value="0"/>
    </style:style>
    <style:style style:name="T279" style:family="text">
      <style:text-properties fo:background-color="#ffb66c" loext:char-shading-value="0"/>
    </style:style>
    <style:style style:name="T280" style:family="text">
      <style:text-properties style:font-name="Liberation Sans" officeooo:rsid="02c5f235"/>
    </style:style>
    <style:style style:name="T281" style:family="text">
      <style:text-properties style:font-name="Liberation Sans" officeooo:rsid="03810564"/>
    </style:style>
    <style:style style:name="T282" style:family="text">
      <style:text-properties style:font-name="Liberation Sans" officeooo:rsid="037ce552"/>
    </style:style>
    <style:style style:name="T283" style:family="text">
      <style:text-properties style:font-name="Liberation Sans" fo:font-weight="bold" officeooo:rsid="037ce552" style:font-weight-asian="bold" style:font-weight-complex="bold"/>
    </style:style>
    <style:style style:name="T284" style:family="text">
      <style:text-properties style:font-name="Liberation Sans" officeooo:rsid="037fd82f"/>
    </style:style>
    <style:style style:name="T285" style:family="text">
      <style:text-properties style:font-name="Liberation Sans" officeooo:rsid="0446d848"/>
    </style:style>
    <style:style style:name="T286" style:family="text">
      <style:text-properties style:font-name="Liberation Sans" officeooo:rsid="037da0d0"/>
    </style:style>
    <style:style style:name="T287" style:family="text">
      <style:text-properties style:font-name="Liberation Sans" officeooo:rsid="0448513e"/>
    </style:style>
    <style:style style:name="T288" style:family="text">
      <style:text-properties fo:color="#127622" loext:opacity="100%" style:font-name="Liberation Sans" officeooo:rsid="0448513e"/>
    </style:style>
    <style:style style:name="T289" style:family="text">
      <style:text-properties style:font-name="Liberation Sans" officeooo:rsid="0446b190"/>
    </style:style>
    <style:style style:name="T290" style:family="text">
      <style:text-properties style:font-name="Liberation Sans" officeooo:rsid="04479eb2"/>
    </style:style>
    <style:style style:name="T291" style:family="text">
      <style:text-properties fo:color="#127622" loext:opacity="100%" style:font-name="Liberation Sans" officeooo:rsid="04479eb2"/>
    </style:style>
    <style:style style:name="T292" style:family="text">
      <style:text-properties fo:color="#127622" loext:opacity="100%"/>
    </style:style>
    <style:style style:name="T293" style:family="text">
      <style:text-properties style:font-name="Gabriela Nerd Font" fo:font-style="normal" officeooo:rsid="011f6d30" style:font-style-asian="normal" style:font-style-complex="normal"/>
    </style:style>
    <style:style style:name="T294" style:family="text">
      <style:text-properties style:font-name="Gabriela Nerd Font" fo:font-style="normal" officeooo:rsid="0124d924" style:font-style-asian="normal" style:font-style-complex="normal"/>
    </style:style>
    <style:style style:name="T295" style:family="text">
      <style:text-properties style:font-name="Gabriela Nerd Font" fo:font-style="normal" officeooo:rsid="015d30e4" style:font-style-asian="normal" style:font-style-complex="normal"/>
    </style:style>
    <style:style style:name="T296" style:family="text">
      <style:text-properties style:font-name="Gabriela Nerd Font" fo:font-style="normal" officeooo:rsid="0124be34" style:font-style-asian="normal" style:font-style-complex="normal"/>
    </style:style>
    <style:style style:name="T297" style:family="text">
      <style:text-properties style:font-name="Gabriela Nerd Font" fo:font-style="normal" officeooo:rsid="015eddd2" style:font-style-asian="normal" style:font-style-complex="normal"/>
    </style:style>
    <style:style style:name="T298" style:family="text">
      <style:text-properties style:font-name="Liberation Sans" fo:font-style="normal" officeooo:rsid="0124be34" style:font-style-asian="normal" style:font-style-complex="normal"/>
    </style:style>
    <style:style style:name="T299" style:family="text">
      <style:text-properties style:font-name="Liberation Sans" fo:font-style="normal" officeooo:rsid="01271f0d" style:font-style-asian="normal" style:font-style-complex="normal"/>
    </style:style>
    <style:style style:name="T300" style:family="text">
      <style:text-properties style:font-name="Liberation Sans" fo:font-style="italic" officeooo:rsid="01271f0d" style:font-style-asian="italic" style:font-style-complex="italic"/>
    </style:style>
    <style:style style:name="T301" style:family="text">
      <style:text-properties style:font-name="Liberation Sans" fo:font-style="normal" officeooo:rsid="015fd407" style:font-style-asian="normal" style:font-style-complex="normal"/>
    </style:style>
    <style:style style:name="T302" style:family="text">
      <style:text-properties style:font-name="Liberation Sans" fo:font-style="normal" officeooo:rsid="0160bf36" style:font-style-asian="normal" style:font-style-complex="normal"/>
    </style:style>
    <style:style style:name="T303" style:family="text">
      <style:text-properties style:font-name="Liberation Sans" fo:font-style="normal" officeooo:rsid="0133f38d" style:font-style-asian="normal" style:font-style-complex="normal"/>
    </style:style>
    <style:style style:name="T304" style:family="text">
      <style:text-properties style:font-name="Liberation Sans" fo:font-style="normal" officeooo:rsid="0161b7bf" style:font-style-asian="normal" style:font-style-complex="normal"/>
    </style:style>
    <style:style style:name="T305" style:family="text">
      <style:text-properties style:font-name="Liberation Sans" fo:font-style="normal" officeooo:rsid="0396c7f9" style:font-style-asian="normal" style:font-style-complex="normal"/>
    </style:style>
    <style:style style:name="T306" style:family="text">
      <style:text-properties style:font-name="Liberation Sans" fo:font-style="normal" officeooo:rsid="03989399" style:font-style-asian="normal" style:font-style-complex="normal"/>
    </style:style>
    <style:style style:name="T307" style:family="text">
      <style:text-properties style:font-name="Liberation Sans" fo:font-style="normal" officeooo:rsid="012a3dc9" style:font-style-asian="normal" style:font-style-complex="normal"/>
    </style:style>
    <style:style style:name="T308" style:family="text">
      <style:text-properties style:font-name="Liberation Sans" fo:font-style="normal" officeooo:rsid="0125bf07" style:font-style-asian="normal" style:font-style-complex="normal"/>
    </style:style>
    <style:style style:name="T309" style:family="text">
      <style:text-properties style:font-name="Liberation Sans" fo:font-style="normal" officeooo:rsid="012a7379" style:font-style-asian="normal" style:font-style-complex="normal"/>
    </style:style>
    <style:style style:name="T310" style:family="text">
      <style:text-properties style:font-name="Liberation Sans" fo:font-style="normal" style:font-style-asian="normal" style:font-style-complex="normal"/>
    </style:style>
    <style:style style:name="T311" style:family="text">
      <style:text-properties style:font-name="Liberation Sans" fo:font-style="normal" fo:background-color="transparent" loext:char-shading-value="0" style:font-style-asian="normal" style:font-style-complex="normal"/>
    </style:style>
    <style:style style:name="T312" style:family="text">
      <style:text-properties style:font-name="Liberation Sans" fo:font-style="normal" officeooo:rsid="012a7379" fo:background-color="transparent" loext:char-shading-value="0" style:font-style-asian="normal" style:font-style-complex="normal"/>
    </style:style>
    <style:style style:name="T313" style:family="text">
      <style:text-properties style:font-name="Liberation Sans" fo:font-style="normal" officeooo:rsid="0162999c" style:font-style-asian="normal" style:font-style-complex="normal"/>
    </style:style>
    <style:style style:name="T314" style:family="text">
      <style:text-properties style:font-name="Liberation Sans" fo:font-style="normal" officeooo:rsid="0399299b" style:font-style-asian="normal" style:font-style-complex="normal"/>
    </style:style>
    <style:style style:name="T315" style:family="text">
      <style:text-properties style:font-name="Liberation Sans" fo:font-style="normal" officeooo:rsid="016c6f20" style:font-style-asian="normal" style:font-style-complex="normal"/>
    </style:style>
    <style:style style:name="T316" style:family="text">
      <style:text-properties style:font-name="Liberation Sans" fo:font-style="normal" officeooo:rsid="017b54ec" style:font-style-asian="normal" style:font-style-complex="normal"/>
    </style:style>
    <style:style style:name="T317" style:family="text">
      <style:text-properties style:font-name="Liberation Sans" fo:font-style="normal" officeooo:rsid="01667f84" style:font-style-asian="normal" style:font-style-complex="normal"/>
    </style:style>
    <style:style style:name="T318" style:family="text">
      <style:text-properties style:font-name="Liberation Sans" fo:font-style="normal" officeooo:rsid="0168635f" style:font-style-asian="normal" style:font-style-complex="normal"/>
    </style:style>
    <style:style style:name="T319" style:family="text">
      <style:text-properties style:font-name="Liberation Sans" fo:font-style="normal" style:text-underline-style="solid" style:text-underline-width="auto" style:text-underline-color="font-color" officeooo:rsid="0168635f" style:font-style-asian="normal" style:font-style-complex="normal"/>
    </style:style>
    <style:style style:name="T320" style:family="text">
      <style:text-properties style:font-name="Liberation Sans" fo:font-style="normal" style:text-underline-style="none" officeooo:rsid="0168635f" style:font-style-asian="normal" style:font-style-complex="normal"/>
    </style:style>
    <style:style style:name="T321" style:family="text">
      <style:text-properties style:font-name="Liberation Sans" fo:font-style="normal" style:text-underline-style="none" officeooo:rsid="01699875" style:font-style-asian="normal" style:font-style-complex="normal"/>
    </style:style>
    <style:style style:name="T322" style:family="text">
      <style:text-properties style:font-name="Liberation Sans" fo:font-style="normal" style:text-underline-style="none" officeooo:rsid="016ad514" style:font-style-asian="normal" style:font-style-complex="normal"/>
    </style:style>
    <style:style style:name="T323" style:family="text">
      <style:text-properties style:font-name="Liberation Sans" fo:font-style="normal" officeooo:rsid="017cc5c8" style:font-style-asian="normal" style:font-style-complex="normal"/>
    </style:style>
    <style:style style:name="T324" style:family="text">
      <style:text-properties fo:color="#127622" loext:opacity="100%" style:font-name="Gabriela Nerd Font" officeooo:rsid="017b61d2"/>
    </style:style>
    <style:style style:name="T325" style:family="text">
      <style:text-properties style:font-name="Liberation Sans" fo:font-style="normal" officeooo:rsid="01725c17" style:font-style-asian="normal" style:font-style-complex="normal"/>
    </style:style>
    <style:style style:name="T326" style:family="text">
      <style:text-properties style:font-name="Liberation Sans" fo:font-style="normal" style:text-underline-style="solid" style:text-underline-width="auto" style:text-underline-color="font-color" officeooo:rsid="01725c17" style:font-style-asian="normal" style:font-style-complex="normal"/>
    </style:style>
    <style:style style:name="T327" style:family="text">
      <style:text-properties style:font-name="Liberation Sans" fo:font-style="normal" style:text-underline-style="solid" style:text-underline-width="auto" style:text-underline-color="font-color" officeooo:rsid="01f1247d" style:font-style-asian="normal" style:font-style-complex="normal"/>
    </style:style>
    <style:style style:name="T328" style:family="text">
      <style:text-properties officeooo:rsid="01f1b37f"/>
    </style:style>
    <style:style style:name="T329" style:family="text">
      <style:text-properties fo:color="#127622" loext:opacity="100%" style:font-name="Gabriela Nerd Font" fo:font-style="normal" officeooo:rsid="00373cd9" style:font-style-asian="normal" style:font-style-complex="normal"/>
    </style:style>
    <style:style style:name="T330" style:family="text">
      <style:text-properties style:font-name="Liberation Sans" fo:font-style="normal" officeooo:rsid="017d343e" style:font-style-asian="normal" style:font-style-complex="normal"/>
    </style:style>
    <style:style style:name="T331" style:family="text">
      <style:text-properties style:font-name="Liberation Sans" fo:font-style="normal" officeooo:rsid="017e233c" style:font-style-asian="normal" style:font-style-complex="normal"/>
    </style:style>
    <style:style style:name="T332" style:family="text">
      <style:text-properties style:font-name="Liberation Sans" fo:font-style="normal" officeooo:rsid="017f2251" style:font-style-asian="normal" style:font-style-complex="normal"/>
    </style:style>
    <style:style style:name="T333" style:family="text">
      <style:text-properties style:font-name="Liberation Sans" fo:font-style="italic" officeooo:rsid="017f2251" style:font-style-asian="italic" style:font-style-complex="italic"/>
    </style:style>
    <style:style style:name="T334" style:family="text">
      <style:text-properties style:font-name="Liberation Sans" fo:font-style="normal" officeooo:rsid="017fecf7" style:font-style-asian="normal" style:font-style-complex="normal"/>
    </style:style>
    <style:style style:name="T335" style:family="text">
      <style:text-properties style:font-name="Liberation Sans" fo:font-style="italic" officeooo:rsid="017fecf7" style:font-style-asian="italic" style:font-style-complex="italic"/>
    </style:style>
    <style:style style:name="T336" style:family="text">
      <style:text-properties style:text-position="super 58%" style:font-name="Liberation Sans" fo:font-style="normal" officeooo:rsid="012a7379" style:font-style-asian="normal" style:font-style-complex="normal"/>
    </style:style>
    <style:style style:name="T337" style:family="text">
      <style:text-properties style:font-name="Liberation Sans" fo:font-style="normal" officeooo:rsid="012a7379" fo:background-color="#ffff00" loext:char-shading-value="0" style:font-style-asian="normal" style:font-style-complex="normal"/>
    </style:style>
    <style:style style:name="T338" style:family="text">
      <style:text-properties style:font-name="Liberation Sans" fo:font-style="normal" officeooo:rsid="012a7379" fo:background-color="#ffbf00" loext:char-shading-value="0" style:font-style-asian="normal" style:font-style-complex="normal"/>
    </style:style>
    <style:style style:name="T339" style:family="text">
      <style:text-properties style:font-name="Liberation Sans" fo:font-style="normal" officeooo:rsid="0181d4e5" style:font-style-asian="normal" style:font-style-complex="normal"/>
    </style:style>
    <style:style style:name="T340" style:family="text">
      <style:text-properties style:font-name="Liberation Sans" fo:font-style="normal" officeooo:rsid="0130c179" style:font-style-asian="normal" style:font-style-complex="normal"/>
    </style:style>
    <style:style style:name="T341" style:family="text">
      <style:text-properties style:font-name="Liberation Sans" fo:font-style="italic" officeooo:rsid="0130c179" style:font-style-asian="italic" style:font-style-complex="italic"/>
    </style:style>
    <style:style style:name="T342" style:family="text">
      <style:text-properties style:font-name="Liberation Sans" fo:font-style="normal" officeooo:rsid="0135ae59" style:font-style-asian="normal" style:font-style-complex="normal"/>
    </style:style>
    <style:style style:name="T343" style:family="text">
      <style:text-properties style:font-name="Liberation Sans" fo:font-style="italic" officeooo:rsid="0135ae59" style:font-style-asian="italic" style:font-style-complex="italic"/>
    </style:style>
    <style:style style:name="T344" style:family="text">
      <style:text-properties style:font-name="Liberation Sans" fo:font-style="normal" officeooo:rsid="0183f5fc" style:font-style-asian="normal" style:font-style-complex="normal"/>
    </style:style>
    <style:style style:name="T345" style:family="text">
      <style:text-properties style:font-name="Liberation Sans" fo:font-style="normal" style:text-underline-style="solid" style:text-underline-width="auto" style:text-underline-color="font-color" officeooo:rsid="0183f5fc" style:font-style-asian="normal" style:font-style-complex="normal"/>
    </style:style>
    <style:style style:name="T346" style:family="text">
      <style:text-properties style:font-name="Liberation Sans" fo:font-style="normal" officeooo:rsid="022c3da9" style:font-style-asian="normal" style:font-style-complex="normal"/>
    </style:style>
    <style:style style:name="T347" style:family="text">
      <style:text-properties style:font-name="Liberation Sans" fo:font-style="normal" officeooo:rsid="022e1d8b" style:font-style-asian="normal" style:font-style-complex="normal"/>
    </style:style>
    <style:style style:name="T348" style:family="text">
      <style:text-properties style:font-name="Liberation Sans" fo:font-style="normal" officeooo:rsid="01389fc3" style:font-style-asian="normal" style:font-style-complex="normal"/>
    </style:style>
    <style:style style:name="T349" style:family="text">
      <style:text-properties style:font-name="Liberation Sans" fo:font-style="normal" officeooo:rsid="0142d060" style:font-style-asian="normal" style:font-style-complex="normal"/>
    </style:style>
    <style:style style:name="T350" style:family="text">
      <style:text-properties style:font-name="Liberation Sans" fo:font-style="normal" officeooo:rsid="0133938b" style:font-style-asian="normal" style:font-style-complex="normal"/>
    </style:style>
    <style:style style:name="T351" style:family="text">
      <style:text-properties style:font-name="Liberation Sans" fo:font-style="italic" officeooo:rsid="0133938b" style:font-style-asian="italic" style:font-style-complex="italic"/>
    </style:style>
    <style:style style:name="T352" style:family="text">
      <style:text-properties style:font-name="Liberation Sans" fo:font-style="normal" officeooo:rsid="0142e52a" style:font-style-asian="normal" style:font-style-complex="normal"/>
    </style:style>
    <style:style style:name="T353" style:family="text">
      <style:text-properties style:font-name="Liberation Sans" fo:font-style="normal" officeooo:rsid="01431cba" style:font-style-asian="normal" style:font-style-complex="normal"/>
    </style:style>
    <style:style style:name="T354" style:family="text">
      <style:text-properties style:font-name="Liberation Sans" fo:font-style="normal" officeooo:rsid="022fe532" style:font-style-asian="normal" style:font-style-complex="normal"/>
    </style:style>
    <style:style style:name="T355" style:family="text">
      <style:text-properties style:font-name="Liberation Sans" fo:font-style="normal" officeooo:rsid="0230912c" style:font-style-asian="normal" style:font-style-complex="normal"/>
    </style:style>
    <style:style style:name="T356" style:family="text">
      <style:text-properties style:font-name="Liberation Sans" fo:font-style="normal" officeooo:rsid="01434133" style:font-style-asian="normal" style:font-style-complex="normal"/>
    </style:style>
    <style:style style:name="T357" style:family="text">
      <style:text-properties style:font-name="Liberation Sans" fo:font-style="normal" officeooo:rsid="013a6c2e" style:font-style-asian="normal" style:font-style-complex="normal"/>
    </style:style>
    <style:style style:name="T358" style:family="text">
      <style:text-properties style:font-name="Liberation Sans" fo:font-style="normal" officeooo:rsid="01841236" style:font-style-asian="normal" style:font-style-complex="normal"/>
    </style:style>
    <style:style style:name="T359" style:family="text">
      <style:text-properties style:font-name="Liberation Sans" fo:font-style="italic" officeooo:rsid="013a6c2e" style:font-style-asian="italic" style:font-style-complex="italic"/>
    </style:style>
    <style:style style:name="T360" style:family="text">
      <style:text-properties officeooo:rsid="0231fea8"/>
    </style:style>
    <style:style style:name="T361" style:family="text">
      <style:text-properties officeooo:rsid="0232a0e1"/>
    </style:style>
    <style:style style:name="T362" style:family="text">
      <style:text-properties officeooo:rsid="02e20260"/>
    </style:style>
    <style:style style:name="T363" style:family="text">
      <style:text-properties officeooo:rsid="03846ea8"/>
    </style:style>
    <style:style style:name="T364" style:family="text">
      <style:text-properties officeooo:rsid="039bf120"/>
    </style:style>
    <style:style style:name="T365" style:family="text">
      <style:text-properties officeooo:rsid="02e32f14"/>
    </style:style>
    <style:style style:name="T366" style:family="text">
      <style:text-properties officeooo:rsid="0386db04"/>
    </style:style>
    <style:style style:name="T367" style:family="text">
      <style:text-properties fo:color="#127622" loext:opacity="100%" officeooo:rsid="03850518"/>
    </style:style>
    <style:style style:name="T368" style:family="text">
      <style:text-properties officeooo:rsid="03850518"/>
    </style:style>
    <style:style style:name="T369" style:family="text">
      <style:text-properties fo:color="#127622" loext:opacity="100%" officeooo:rsid="0385a550"/>
    </style:style>
    <style:style style:name="T370" style:family="text">
      <style:text-properties officeooo:rsid="0385a550"/>
    </style:style>
    <style:style style:name="T371" style:family="text">
      <style:text-properties fo:color="#127622" loext:opacity="100%" officeooo:rsid="03860944"/>
    </style:style>
    <style:style style:name="T372" style:family="text">
      <style:text-properties fo:color="#127622" loext:opacity="100%" officeooo:rsid="0386db04"/>
    </style:style>
    <style:style style:name="T373" style:family="text">
      <style:text-properties officeooo:rsid="03872739"/>
    </style:style>
    <style:style style:name="T374" style:family="text">
      <style:text-properties officeooo:rsid="03892397"/>
    </style:style>
    <style:style style:name="T375" style:family="text">
      <style:text-properties officeooo:rsid="0389adf1"/>
    </style:style>
    <style:style style:name="T376" style:family="text">
      <style:text-properties officeooo:rsid="04000816"/>
    </style:style>
    <style:style style:name="T377" style:family="text">
      <style:text-properties fo:color="#127622" loext:opacity="100%" officeooo:rsid="04000816"/>
    </style:style>
    <style:style style:name="T378" style:family="text">
      <style:text-properties fo:color="#127622" loext:opacity="100%" officeooo:rsid="0407894d"/>
    </style:style>
    <style:style style:name="T379" style:family="text">
      <style:text-properties fo:color="#127622" loext:opacity="100%" officeooo:rsid="0400f0ba"/>
    </style:style>
    <style:style style:name="T380" style:family="text">
      <style:text-properties officeooo:rsid="0400f0ba"/>
    </style:style>
    <style:style style:name="T381" style:family="text">
      <style:text-properties fo:color="#127622" loext:opacity="100%" officeooo:rsid="04053a5c"/>
    </style:style>
    <style:style style:name="T382" style:family="text">
      <style:text-properties officeooo:rsid="04053a5c"/>
    </style:style>
    <style:style style:name="T383" style:family="text">
      <style:text-properties fo:color="#127622" loext:opacity="100%" officeooo:rsid="0405a019"/>
    </style:style>
    <style:style style:name="T384" style:family="text">
      <style:text-properties fo:color="#127622" loext:opacity="100%" officeooo:rsid="0406267a"/>
    </style:style>
    <style:style style:name="T385" style:family="text">
      <style:text-properties fo:color="#127622" loext:opacity="100%" officeooo:rsid="0407027c"/>
    </style:style>
    <style:style style:name="T386" style:family="text">
      <style:text-properties fo:color="#127622" loext:opacity="100%" officeooo:rsid="0409a857"/>
    </style:style>
    <style:style style:name="T387" style:family="text">
      <style:text-properties officeooo:rsid="0409a857"/>
    </style:style>
    <style:style style:name="T388" style:family="text">
      <style:text-properties officeooo:rsid="03f54927"/>
    </style:style>
    <style:style style:name="T389" style:family="text">
      <style:text-properties officeooo:rsid="0411a5be"/>
    </style:style>
    <style:style style:name="T390" style:family="text">
      <style:text-properties officeooo:rsid="03f83828"/>
    </style:style>
    <style:style style:name="T391" style:family="text">
      <style:text-properties fo:color="#127622" loext:opacity="100%" officeooo:rsid="03f71741"/>
    </style:style>
    <style:style style:name="T392" style:family="text">
      <style:text-properties officeooo:rsid="03fb6e98"/>
    </style:style>
    <style:style style:name="T393" style:family="text">
      <style:text-properties officeooo:rsid="03fa2bb2"/>
    </style:style>
    <style:style style:name="T394" style:family="text">
      <style:text-properties fo:color="#127622" loext:opacity="100%" officeooo:rsid="03fa2bb2"/>
    </style:style>
    <style:style style:name="T395" style:family="text">
      <style:text-properties officeooo:rsid="03fea5f9"/>
    </style:style>
    <style:style style:name="T396" style:family="text">
      <style:text-properties fo:color="#127622" loext:opacity="100%" officeooo:rsid="03fea5f9"/>
    </style:style>
    <style:style style:name="T397" style:family="text">
      <style:text-properties officeooo:rsid="0417432b"/>
    </style:style>
    <style:style style:name="T398" style:family="text">
      <style:text-properties fo:color="#127622" loext:opacity="100%" officeooo:rsid="041833ff"/>
    </style:style>
    <style:style style:name="T399" style:family="text">
      <style:text-properties officeooo:rsid="041833ff"/>
    </style:style>
    <style:style style:name="T400" style:family="text">
      <style:text-properties officeooo:rsid="041bd0a6"/>
    </style:style>
    <style:style style:name="T401" style:family="text">
      <style:text-properties officeooo:rsid="041b9cc0"/>
    </style:style>
    <style:style style:name="T402" style:family="text">
      <style:text-properties officeooo:rsid="04244676"/>
    </style:style>
    <style:style style:name="T403" style:family="text">
      <style:text-properties officeooo:rsid="042bce50"/>
    </style:style>
    <style:style style:name="T404" style:family="text">
      <style:text-properties officeooo:rsid="044011fb"/>
    </style:style>
    <style:style style:name="T405" style:family="text">
      <style:text-properties officeooo:rsid="043f6dde"/>
    </style:style>
    <style:style style:name="T406" style:family="text">
      <style:text-properties officeooo:rsid="042dfaa1"/>
    </style:style>
    <style:style style:name="T407" style:family="text">
      <style:text-properties officeooo:rsid="041c7bdf"/>
    </style:style>
    <style:style style:name="T408" style:family="text">
      <style:text-properties fo:color="#127622" loext:opacity="100%" officeooo:rsid="041c7bdf"/>
    </style:style>
    <style:style style:name="T409" style:family="text">
      <style:text-properties officeooo:rsid="0425859d"/>
    </style:style>
    <style:style style:name="T410" style:family="text">
      <style:text-properties officeooo:rsid="04260516"/>
    </style:style>
    <style:style style:name="T411" style:family="text">
      <style:text-properties officeooo:rsid="042773ff"/>
    </style:style>
    <style:style style:name="T412" style:family="text">
      <style:text-properties officeooo:rsid="041dc761"/>
    </style:style>
    <style:style style:name="T413" style:family="text">
      <style:text-properties officeooo:rsid="041e9ed3"/>
    </style:style>
    <style:style style:name="T414" style:family="text">
      <style:text-properties officeooo:rsid="042d32b8"/>
    </style:style>
    <style:style style:name="T415" style:family="text">
      <style:text-properties officeooo:rsid="043204b0"/>
    </style:style>
    <style:style style:name="T416" style:family="text">
      <style:text-properties officeooo:rsid="0433216b"/>
    </style:style>
    <style:style style:name="T417" style:family="text">
      <style:text-properties officeooo:rsid="04387e5c"/>
    </style:style>
    <style:style style:name="T418" style:family="text">
      <style:text-properties officeooo:rsid="04417fad"/>
    </style:style>
    <style:style style:name="T419" style:family="text">
      <style:text-properties officeooo:rsid="0436a573"/>
    </style:style>
    <style:style style:name="T420" style:family="text">
      <style:text-properties style:font-name="Gabriela Nerd Font" fo:font-style="normal" officeooo:rsid="01214d99" style:font-style-asian="normal" style:font-style-complex="normal"/>
    </style:style>
    <style:style style:name="T421" style:family="text">
      <style:text-properties style:font-name="Gabriela Nerd Font" fo:font-style="normal" style:text-underline-style="none" officeooo:rsid="01214d99" style:font-style-asian="normal" style:font-style-complex="normal"/>
    </style:style>
    <style:style style:name="T422" style:family="text">
      <style:text-properties style:font-name="Gabriela Nerd Font" fo:font-style="normal" officeooo:rsid="01578037" style:font-style-asian="normal" style:font-style-complex="normal"/>
    </style:style>
    <style:style style:name="T423" style:family="text">
      <style:text-properties style:font-name="Gabriela Nerd Font" fo:font-style="normal" officeooo:rsid="01885f42" style:font-style-asian="normal" style:font-style-complex="normal"/>
    </style:style>
    <style:style style:name="T424" style:family="text">
      <style:text-properties style:font-name="Liberation Sans" fo:font-style="normal" officeooo:rsid="01441f46" style:font-style-asian="normal" style:font-style-complex="normal"/>
    </style:style>
    <style:style style:name="T425" style:family="text">
      <style:text-properties style:font-name="Liberation Sans" fo:font-style="normal" officeooo:rsid="0147d9aa" style:font-style-asian="normal" style:font-style-complex="normal"/>
    </style:style>
    <style:style style:name="T426" style:family="text">
      <style:text-properties fo:color="#127622" loext:opacity="100%" style:font-name="Gabriela Nerd Font" officeooo:rsid="01574a10"/>
    </style:style>
    <style:style style:name="T427" style:family="text">
      <style:text-properties style:font-name="Liberation Sans" fo:font-style="normal" officeooo:rsid="01572b98" style:font-style-asian="normal" style:font-style-complex="normal"/>
    </style:style>
    <style:style style:name="T428" style:family="text">
      <style:text-properties style:font-name="Liberation Sans" fo:font-style="normal" officeooo:rsid="04422192" style:font-style-asian="normal" style:font-style-complex="normal"/>
    </style:style>
    <style:style style:name="T429" style:family="text">
      <style:text-properties style:font-name="Liberation Sans" fo:font-style="normal" officeooo:rsid="01f2d20e" style:font-style-asian="normal" style:font-style-complex="normal"/>
    </style:style>
    <style:style style:name="T430" style:family="text">
      <style:text-properties style:font-name="Liberation Sans" fo:font-style="normal" officeooo:rsid="0235ef43" style:font-style-asian="normal" style:font-style-complex="normal"/>
    </style:style>
    <style:style style:name="T431" style:family="text">
      <style:text-properties style:font-name="Liberation Sans" fo:font-style="normal" officeooo:rsid="014994f5" style:font-style-asian="normal" style:font-style-complex="normal"/>
    </style:style>
    <style:style style:name="T432" style:family="text">
      <style:text-properties style:font-name="Liberation Sans" fo:font-style="normal" officeooo:rsid="02e63250" style:font-style-asian="normal" style:font-style-complex="normal"/>
    </style:style>
    <style:style style:name="T433" style:family="text">
      <style:text-properties officeooo:rsid="014a37af"/>
    </style:style>
    <style:style style:name="T434" style:family="text">
      <style:text-properties officeooo:rsid="014a37af" fo:background-color="#ffff00" loext:char-shading-value="0"/>
    </style:style>
    <style:style style:name="T435" style:family="text">
      <style:text-properties officeooo:rsid="014adecd"/>
    </style:style>
    <style:style style:name="T436" style:family="text">
      <style:text-properties officeooo:rsid="014c3004"/>
    </style:style>
    <style:style style:name="T437" style:family="text">
      <style:text-properties officeooo:rsid="014c3004" fo:background-color="#ffff00" loext:char-shading-value="0"/>
    </style:style>
    <style:style style:name="T438" style:family="text">
      <style:text-properties officeooo:rsid="014dc19f"/>
    </style:style>
    <style:style style:name="T439" style:family="text">
      <style:text-properties fo:font-weight="normal" officeooo:rsid="014dc19f" fo:background-color="#ffbf00" loext:char-shading-value="0" style:font-weight-asian="normal" style:font-weight-complex="normal"/>
    </style:style>
    <style:style style:name="T440" style:family="text">
      <style:text-properties officeooo:rsid="014dc19f" fo:background-color="#ffff00" loext:char-shading-value="0"/>
    </style:style>
    <style:style style:name="T441" style:family="text">
      <style:text-properties officeooo:rsid="039d4e47"/>
    </style:style>
    <style:style style:name="T442" style:family="text">
      <style:text-properties officeooo:rsid="01890a81"/>
    </style:style>
    <style:style style:name="T443" style:family="text">
      <style:text-properties officeooo:rsid="03a16e36"/>
    </style:style>
    <style:style style:name="T444" style:family="text">
      <style:text-properties officeooo:rsid="039e9449"/>
    </style:style>
    <style:style style:name="T445" style:family="text">
      <style:text-properties officeooo:rsid="03a03173"/>
    </style:style>
    <style:style style:name="T446" style:family="text">
      <style:text-properties officeooo:rsid="03a246b0"/>
    </style:style>
    <style:style style:name="T447" style:family="text">
      <style:text-properties officeooo:rsid="03a29767"/>
    </style:style>
    <style:style style:name="T448" style:family="text">
      <style:text-properties officeooo:rsid="03a320f8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officeooo:rsid="03a727ee"/>
    </style:style>
    <style:style style:name="T451" style:family="text">
      <style:text-properties officeooo:rsid="03aaa2bf"/>
    </style:style>
    <style:style style:name="T452" style:family="text">
      <style:text-properties officeooo:rsid="03a584d5"/>
    </style:style>
    <style:style style:name="T453" style:family="text">
      <style:text-properties officeooo:rsid="03bfdbb5"/>
    </style:style>
    <style:style style:name="T454" style:family="text">
      <style:text-properties officeooo:rsid="03c01227"/>
    </style:style>
    <style:style style:name="T455" style:family="text">
      <style:text-properties fo:font-style="normal" officeooo:rsid="018c3bfb" style:font-style-asian="normal" style:font-style-complex="normal"/>
    </style:style>
    <style:style style:name="T456" style:family="text">
      <style:text-properties fo:font-style="normal" officeooo:rsid="018df695" style:font-style-asian="normal" style:font-style-complex="normal"/>
    </style:style>
    <style:style style:name="T457" style:family="text">
      <style:text-properties fo:font-style="normal" officeooo:rsid="03c1b663" style:font-style-asian="normal" style:font-style-complex="normal"/>
    </style:style>
    <style:style style:name="T458" style:family="text">
      <style:text-properties officeooo:rsid="03ac6772"/>
    </style:style>
    <style:style style:name="T459" style:family="text">
      <style:text-properties officeooo:rsid="03af1c9d"/>
    </style:style>
    <style:style style:name="T460" style:family="text">
      <style:text-properties officeooo:rsid="03afe66a"/>
    </style:style>
    <style:style style:name="T461" style:family="text">
      <style:text-properties officeooo:rsid="02ee3a49"/>
    </style:style>
    <style:style style:name="T462" style:family="text">
      <style:text-properties officeooo:rsid="02efa0e7"/>
    </style:style>
    <style:style style:name="T463" style:family="text">
      <style:text-properties officeooo:rsid="0308b9db"/>
    </style:style>
    <style:style style:name="T464" style:family="text">
      <style:text-properties officeooo:rsid="02f31d94"/>
    </style:style>
    <style:style style:name="T465" style:family="text">
      <style:text-properties fo:font-style="normal" officeooo:rsid="018ba6cb" style:font-style-asian="normal" style:font-style-complex="normal"/>
    </style:style>
    <style:style style:name="T466" style:family="text">
      <style:text-properties fo:font-style="normal" officeooo:rsid="018bee23" style:font-style-asian="normal" style:font-style-complex="normal"/>
    </style:style>
    <style:style style:name="T467" style:family="text">
      <style:text-properties fo:font-style="normal" officeooo:rsid="01f3f1f6" style:font-style-asian="normal" style:font-style-complex="normal"/>
    </style:style>
    <style:style style:name="T468" style:family="text">
      <style:text-properties officeooo:rsid="0308dbec"/>
    </style:style>
    <style:style style:name="T469" style:family="text">
      <style:text-properties officeooo:rsid="01a12651"/>
    </style:style>
    <style:style style:name="T470" style:family="text">
      <style:text-properties officeooo:rsid="03a40a4c"/>
    </style:style>
    <style:style style:name="T471" style:family="text">
      <style:text-properties officeooo:rsid="03cc23e1"/>
    </style:style>
    <style:style style:name="T472" style:family="text">
      <style:text-properties officeooo:rsid="01b4b456"/>
    </style:style>
    <style:style style:name="T473" style:family="text">
      <style:text-properties officeooo:rsid="02fd1e59"/>
    </style:style>
    <style:style style:name="T474" style:family="text">
      <style:text-properties officeooo:rsid="02370b5b"/>
    </style:style>
    <style:style style:name="T475" style:family="text">
      <style:text-properties fo:font-style="normal" officeooo:rsid="0190967e" style:font-style-asian="normal" style:font-style-complex="normal"/>
    </style:style>
    <style:style style:name="T476" style:family="text">
      <style:text-properties officeooo:rsid="03c7a892"/>
    </style:style>
    <style:style style:name="T477" style:family="text">
      <style:text-properties officeooo:rsid="03cd4a10"/>
    </style:style>
    <style:style style:name="T478" style:family="text">
      <style:text-properties officeooo:rsid="03cd22c9"/>
    </style:style>
    <style:style style:name="T479" style:family="text">
      <style:text-properties officeooo:rsid="03d23d5f"/>
    </style:style>
    <style:style style:name="T480" style:family="text">
      <style:text-properties officeooo:rsid="03d121f4"/>
    </style:style>
    <style:style style:name="T481" style:family="text">
      <style:text-properties officeooo:rsid="030ac962"/>
    </style:style>
    <style:style style:name="T482" style:family="text">
      <style:text-properties officeooo:rsid="02fc7dba"/>
    </style:style>
    <style:style style:name="T483" style:family="text">
      <style:text-properties officeooo:rsid="03d4d769"/>
    </style:style>
    <style:style style:name="T484" style:family="text">
      <style:text-properties officeooo:rsid="03d667ec"/>
    </style:style>
    <style:style style:name="T485" style:family="text">
      <style:text-properties fo:font-style="normal" officeooo:rsid="01966199" style:font-style-asian="normal" style:font-style-complex="normal"/>
    </style:style>
    <style:style style:name="T486" style:family="text">
      <style:text-properties fo:font-style="normal" officeooo:rsid="03d6ae22" style:font-style-asian="normal" style:font-style-complex="normal"/>
    </style:style>
    <style:style style:name="T487" style:family="text">
      <style:text-properties fo:font-style="normal" officeooo:rsid="03b57ef5" style:font-style-asian="normal" style:font-style-complex="normal"/>
    </style:style>
    <style:style style:name="T488" style:family="text">
      <style:text-properties fo:font-style="normal" officeooo:rsid="03b5c57e" style:font-style-asian="normal" style:font-style-complex="normal"/>
    </style:style>
    <style:style style:name="T489" style:family="text">
      <style:text-properties officeooo:rsid="03d7082f"/>
    </style:style>
    <style:style style:name="T490" style:family="text">
      <style:text-properties officeooo:rsid="01b5d66b"/>
    </style:style>
    <style:style style:name="T491" style:family="text">
      <style:text-properties officeooo:rsid="03d97022"/>
    </style:style>
    <style:style style:name="T492" style:family="text">
      <style:text-properties officeooo:rsid="03de2e58"/>
    </style:style>
    <style:style style:name="T493" style:family="text">
      <style:text-properties officeooo:rsid="03dac942"/>
    </style:style>
    <style:style style:name="T494" style:family="text">
      <style:text-properties officeooo:rsid="03dc7414"/>
    </style:style>
    <style:style style:name="T495" style:family="text">
      <style:text-properties fo:font-style="normal" officeooo:rsid="019add63" style:font-style-asian="normal" style:font-style-complex="normal"/>
    </style:style>
    <style:style style:name="T496" style:family="text">
      <style:text-properties fo:font-style="normal" officeooo:rsid="019cac46" style:font-style-asian="normal" style:font-style-complex="normal"/>
    </style:style>
    <style:style style:name="T497" style:family="text">
      <style:text-properties fo:font-style="normal" officeooo:rsid="03b99376" style:font-style-asian="normal" style:font-style-complex="normal"/>
    </style:style>
    <style:style style:name="T498" style:family="text">
      <style:text-properties fo:font-style="normal" officeooo:rsid="03bb2109" style:font-style-asian="normal" style:font-style-complex="normal"/>
    </style:style>
    <style:style style:name="T499" style:family="text">
      <style:text-properties officeooo:rsid="03df4a60"/>
    </style:style>
    <style:style style:name="T500" style:family="text">
      <style:text-properties officeooo:rsid="03e0f807"/>
    </style:style>
    <style:style style:name="T501" style:family="text">
      <style:text-properties officeooo:rsid="0304e792"/>
    </style:style>
    <style:style style:name="T502" style:family="text">
      <style:text-properties officeooo:rsid="03e8b2ec"/>
    </style:style>
    <style:style style:name="T503" style:family="text">
      <style:text-properties officeooo:rsid="02e99e48"/>
    </style:style>
    <style:style style:name="T504" style:family="text">
      <style:text-properties officeooo:rsid="030e66e8"/>
    </style:style>
    <style:style style:name="T505" style:family="text">
      <style:text-properties officeooo:rsid="02eb7c5d"/>
    </style:style>
    <style:style style:name="T506" style:family="text">
      <style:text-properties officeooo:rsid="03bd439d"/>
    </style:style>
    <style:style style:name="T507" style:family="text">
      <style:text-properties officeooo:rsid="03bdabd2"/>
    </style:style>
    <style:style style:name="T508" style:family="text">
      <style:text-properties officeooo:rsid="03bde385"/>
    </style:style>
    <style:style style:name="T509" style:family="text">
      <style:text-properties officeooo:rsid="03e2c522"/>
    </style:style>
    <style:style style:name="T510" style:family="text">
      <style:text-properties officeooo:rsid="03e45d1a"/>
    </style:style>
    <style:style style:name="T511" style:family="text">
      <style:text-properties officeooo:rsid="03e7ad30"/>
    </style:style>
    <style:style style:name="T512" style:family="text">
      <style:text-properties officeooo:rsid="03bb6831"/>
    </style:style>
    <style:style style:name="T513" style:family="text">
      <style:text-properties officeooo:rsid="03ece9d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hought provoking studies that will engage you in God’s word</text:p>
      <text:p text:style-name="P1">and <text:span text:style-name="T2">challenge</text:span> what you believe <text:span text:style-name="T3">with it.</text:span></text:p>
      <text:p text:style-name="P2"><text:span text:style-name="T4">1Peter 1:15,16</text:span>, <text:span text:style-name="T4">2Cor 6:17</text:span></text:p>
      <text:p text:style-name="Standard"/>
      <text:p text:style-name="Standard"/>
      <text:p text:style-name="Horizontal_20_Line"/>
      <text:p text:style-name="P3"><text:span text:style-name="T5">A</text:span><text:span text:style-name="T6">hithophel is Bathsheba’s grandfather.</text:span></text:p>
      <text:list text:style-name="L1">
        <text:list-item>
          <text:p text:style-name="P4"><text:span text:style-name="T7">In order for this to be true, </text:span><text:span text:style-name="T8">first </text:span><text:span text:style-name="T7">we have to </text:span><text:span text:style-name="T9">prove that</text:span><text:span text:style-name="T7"> </text:span><text:span text:style-name="T10">either</text:span><text:span text:style-name="T7"> </text:span>Ammiel <text:span text:style-name="T11">(</text:span><text:span text:style-name="T12">1 Chronicles 3:5</text:span><text:span text:style-name="T11">) </text:span>and Eliam <text:span text:style-name="T11">(</text:span><text:span text:style-name="T12">2 Samuel 11:3</text:span><text:span text:style-name="T11">) </text:span>are the same man <text:span text:style-name="T10">or that Ammiel is a</text:span><text:span text:style-name="T13">n ancestor that came </text:span><text:span text:style-name="T10">before Ahithophe</text:span><text:span text:style-name="T13">l.</text:span></text:p>
          <text:list>
            <text:list-item>
              <text:p text:style-name="P5"><text:span text:style-name="T14">But, w</text:span>e can’<text:span text:style-name="T14">t</text:span> prove<text:span text:style-name="T15"> </text:span><text:span text:style-name="T16">with the Bible </text:span>that they are the same man.</text:p>
            </text:list-item>
            <text:list-item>
              <text:p text:style-name="P5"><text:span text:style-name="T10">We also </text:span><text:span text:style-name="T17">can’t</text:span><text:span text:style-name="T10"> prove that Ammiel is a distant ancestor of Bathsheba.</text:span></text:p>
            </text:list-item>
            <text:list-item>
              <text:p text:style-name="P5"><text:span text:style-name="T10">A</text:span>nd so <text:span text:style-name="T18">at least </text:span>four <text:span text:style-name="T19">possible</text:span><text:span text:style-name="T20"> </text:span><text:span text:style-name="T19">genealogies</text:span> emerge <text:span text:style-name="T21">from what we are given by scripture.</text:span></text:p>
            </text:list-item>
          </text:list>
        </text:list-item>
      </text:list>
      <text:p text:style-name="P6"/>
      <text:p text:style-name="P7"/>
      <text:p text:style-name="P8"><text:span text:style-name="T22">G</text:span><text:span text:style-name="T23">ershom is Moses’ firstborn to Zipporah.</text:span></text:p>
      <text:list text:continue-numbering="true" text:style-name="L1">
        <text:list-item>
          <text:p text:style-name="P9">There aren’t a lot of mentions of Eliezer and Gershom the sons of Moses.</text:p>
        </text:list-item>
        <text:list-item>
          <text:p text:style-name="P10">Never does the Bible explicitly state that either Eliezer or Gershom were the firstborn.</text:p>
        </text:list-item>
      </text:list>
      <text:p text:style-name="P11"/>
      <text:p text:style-name="Horizontal_20_Line"/>
      <text:p text:style-name="P12"><text:span text:style-name="T24">Z</text:span><text:span text:style-name="T25">ipporah and the Ethiopian woman </text:span><text:span text:style-name="T26">are two different woman.</text:span></text:p>
      <text:list text:continue-numbering="true" text:style-name="L1">
        <text:list-item>
          <text:p text:style-name="P13"><text:span text:style-name="T27">After Zipporah and her sons rejoin Moses with his father in law Reuel/Jethro/Hobab </text:span><text:span text:style-name="T28">after the exodus from Egypt </text:span><text:span text:style-name="T27">(</text:span><text:span text:style-name="T29">Exodus 18:2</text:span><text:span text:style-name="T27">) </text:span><text:span text:style-name="T28">they </text:span><text:span text:style-name="T30">don’t leave:</text:span><text:span text:style-name="T28"> only Jethro </text:span><text:span text:style-name="T30">departs</text:span><text:span text:style-name="T28"> (</text:span><text:span text:style-name="T29">Exodus 18:27</text:span><text:span text:style-name="T28">). </text:span><text:span text:style-name="T31">Zipporah is both a Cushite </text:span><text:span text:style-name="T32">and a Midianite. Her ancestry includes</text:span><text:span text:style-name="T31"> </text:span><text:span text:style-name="T32">a mix of the </text:span><text:span text:style-name="T31">descendant</text:span><text:span text:style-name="T32">s</text:span><text:span text:style-name="T31"> of Cush the son of Ham the son of Noah </text:span><text:span text:style-name="T32">and</text:span><text:span text:style-name="T31"> Midian</text:span><text:span text:style-name="T33"> </text:span><text:span text:style-name="T34">the </text:span><text:span text:style-name="T31">son of </text:span><text:span text:style-name="T34">Abraham </text:span><text:span text:style-name="T32">son of Shem </text:span><text:span text:style-name="T35">the son of Noah</text:span><text:span text:style-name="T31">.</text:span></text:p>
        </text:list-item>
      </text:list>
      <text:p text:style-name="P14"/>
      <text:p text:style-name="Horizontal_20_Line"/>
      <text:p text:style-name="P15"><text:span text:style-name="T1">D</text:span><text:span text:style-name="T36">rinking alcohol is sin.</text:span></text:p>
      <text:list text:continue-numbering="true" text:style-name="L1">
        <text:list-item>
          <text:p text:style-name="P13"><text:span text:style-name="T37">R</text:span><text:span text:style-name="T38">ead </text:span><text:span text:style-name="T39">both</text:span><text:span text:style-name="T38"> </text:span><text:span text:style-name="T29">James 1:13,14</text:span><text:span text:style-name="T38"> </text:span><text:span text:style-name="T39">and</text:span><text:span text:style-name="T38"> </text:span><text:span text:style-name="T29">John 2:1-11</text:span><text:span text:style-name="T38"> very carefully </text:span><text:span text:style-name="T40">and put them together.</text:span></text:p>
          <text:list>
            <text:list-item>
              <text:p text:style-name="P16"><text:span text:style-name="T41">There are two usages of the word “tempt” in the Bible. One is to “test/prove” </text:span><text:span text:style-name="T42">as in </text:span><text:span text:style-name="T29">Genesis 22:1</text:span> and <text:span text:style-name="T29">Matthew 4:7 </text:span><text:span text:style-name="T43">and the other is “to entice to evil” </text:span><text:span text:style-name="T44">as in </text:span><text:span text:style-name="T29">Matthew 4:1</text:span><text:span text:style-name="T45"> </text:span><text:span text:style-name="T46">and</text:span><text:span text:style-name="T43"> </text:span><text:span text:style-name="T29">James 1:13,14</text:span>.</text:p>
              <text:list>
                <text:list-item>
                  <text:p text:style-name="P17">The point: God will not, does not, <text:span text:style-name="T47">and cannot</text:span> entice/<text:span text:style-name="T48">incite/instigate</text:span> men to <text:span text:style-name="T49">sin</text:span>.</text:p>
                </text:list-item>
              </text:list>
            </text:list-item>
            <text:list-item>
              <text:p text:style-name="P18"><text:span text:style-name="T50">In </text:span><text:span text:style-name="T29">John 2:8</text:span><text:span text:style-name="T50">, </text:span><text:span text:style-name="T38">Jesus commands: “</text:span><text:span text:style-name="T51">Draw out now, and bear unto the governor of the feast.</text:span><text:span text:style-name="T52">”</text:span></text:p>
            </text:list-item>
            <text:list-item>
              <text:p text:style-name="P18"><text:span text:style-name="T53">Therefore, calling</text:span><text:span text:style-name="T38"> drinking alcohol (in this case wine) sin </text:span><text:span text:style-name="T53">is the same as accusing Jesus of sinning.</text:span></text:p>
            </text:list-item>
          </text:list>
        </text:list-item>
        <text:list-item>
          <text:p text:style-name="P19"><text:span text:style-name="T29">Proverbs 31:6</text:span><text:span text:style-name="T54"> “</text:span><text:span text:style-name="T55">Give strong drink</text:span><text:span text:style-name="T54"> unto him that is ready to perish, and </text:span><text:span text:style-name="T55">wine</text:span><text:span text:style-name="T54"> unto those that be of heavy hearts.”</text:span></text:p>
          <text:list>
            <text:list-item>
              <text:list>
                <text:list-item>
                  <text:p text:style-name="P19"><text:span text:style-name="T56">W</text:span><text:span text:style-name="T54">e are </text:span><text:span text:style-name="T56">instructed by God (</text:span><text:span text:style-name="T29">2 Tim 3:16a, </text:span><text:span text:style-name="T57">Pro 30:5a</text:span><text:span text:style-name="T56">) to give “strong drink” </text:span><text:span text:style-name="T58">(</text:span><text:span text:style-name="T57">Num</text:span><text:span text:style-name="T59">bers</text:span><text:span text:style-name="T57"> 28:7</text:span><text:span text:style-name="T58"> “strong wine”) </text:span><text:span text:style-name="T56">to those that are ready to die.</text:span></text:p>
                </text:list-item>
                <text:list-item>
                  <text:p text:style-name="P20"><text:span text:style-name="T60">In the same verse we are </text:span><text:span text:style-name="T61">also </text:span><text:span text:style-name="T60">instructed to give wine to those that that have </text:span><text:span text:style-name="T62">a</text:span><text:span text:style-name="T60"> heavy (angry, bitter, chafed, discontented) hearts.</text:span></text:p>
                </text:list-item>
                <text:list-item>
                  <text:p text:style-name="P21"><text:span text:style-name="T63">If drinking alcohol were sin, </text:span><text:span text:style-name="T64">why would God give us instructions on it’s appropriate usage?</text:span></text:p>
                </text:list-item>
                <text:list-item>
                  <text:p text:style-name="P22"><text:span text:style-name="T65">Furthermore, alcohol was a required ingredient for several sacrifices in the law (known as the drink offering): </text:span><text:span text:style-name="T66">Exo 29:40</text:span><text:span text:style-name="T65">, </text:span><text:span text:style-name="T66">Lev 23:13</text:span><text:span text:style-name="T65">, </text:span><text:span text:style-name="T66">Num 15:5</text:span><text:span text:style-name="T65">, </text:span><text:span text:style-name="T66">28:7</text:span> (strong wine)<text:span text:style-name="T65">.</text:span></text:p>
                </text:list-item>
              </text:list>
            </text:list-item>
          </text:list>
        </text:list-item>
        <text:list-item>
          <text:p text:style-name="P21"><text:span text:style-name="T29">Genesis 14:18</text:span><text:span text:style-name="T63"> “And Melchizedek king of Salem brought forth bread and </text:span><text:span text:style-name="T67">wine</text:span><text:span text:style-name="T63">: and he was the priest of the most high God.”</text:span></text:p>
          <text:list>
            <text:list-item>
              <text:p text:style-name="P23"><text:span text:style-name="T63">T</text:span><text:span text:style-name="T68">he very King of </text:span><text:span text:style-name="T69">P</text:span><text:span text:style-name="T68">eace himself, God in the flesh, brought wine as a gift for Abraham </text:span><text:span text:style-name="T70">(</text:span><text:span text:style-name="T29">Hebrews 7:1-3</text:span><text:span text:style-name="T70">).</text:span></text:p>
            </text:list-item>
          </text:list>
        </text:list-item>
        <text:list-item>
          <text:p text:style-name="P24"><text:span text:style-name="T29">Judges 9:13</text:span><text:span text:style-name="T71"> “And the vine said unto them, Should I leave my </text:span><text:span text:style-name="T72">wine</text:span><text:span text:style-name="T71">, </text:span><text:span text:style-name="T72">which cheereth God</text:span><text:span text:style-name="T71"> and man, and go to be promoted over the trees?”</text:span></text:p>
          <text:list>
            <text:list-item>
              <text:p text:style-name="P25"><text:span text:style-name="T73">T</text:span><text:span text:style-name="T60">he Holy Ghost, </text:span><text:span text:style-name="T73">via </text:span><text:span text:style-name="T60">Jotham’</text:span><text:span text:style-name="T74">s</text:span><text:span text:style-name="T60"> </text:span><text:span text:style-name="T73">mouth, </text:span><text:span text:style-name="T60">testifies that wine cheereth </text:span><text:span text:style-name="T75">(glad, rejoice, joy, merry) </text:span><text:span text:style-name="T76">God</text:span><text:span text:style-name="T60"> </text:span><text:span text:style-name="T77">and man.</text:span></text:p>
            </text:list-item>
          </text:list>
        </text:list-item>
      </text:list>
      <text:p text:style-name="P26"/>
      <text:p text:style-name="P27"/>
      <text:p text:style-name="P28"><text:span text:style-name="T78">N</text:span><text:span text:style-name="T79">ahash (</text:span><text:span text:style-name="T80">an</text:span><text:span text:style-name="T81"> ancestor of </text:span><text:span text:style-name="T79">Abigail sister of king David) is the same man as Jesse </text:span><text:span text:style-name="T82">(king David’s father) </text:span><text:span text:style-name="T83">or is a former husband of Jesse’s wife </text:span><text:span text:style-name="T84">or is the name of Jesse’s wife.</text:span></text:p>
      <text:list text:continue-numbering="true" text:style-name="L1">
        <text:list-item>
          <text:p text:style-name="P29"><text:span text:style-name="T85">This one shows up </text:span><text:span text:style-name="T86">seemingly everywhere </text:span><text:span text:style-name="T85">in Bible notes </text:span><text:span text:style-name="T87">and </text:span><text:span text:style-name="T86">also in </text:span><text:span text:style-name="T87">Rabbinic teachings.</text:span><text:span text:style-name="T88"> </text:span><text:span text:style-name="T29">1 Chronicles 2:13-16</text:span> is often cited as the proof <text:span text:style-name="T89">(if any is even offered).</text:span></text:p>
        </text:list-item>
        <text:list-item>
          <text:p text:style-name="P30"><text:span text:style-name="T90">If you </text:span><text:span text:style-name="T88">compare </text:span><text:span text:style-name="T29">2 Samuel 17:25</text:span><text:span text:style-name="T88"> to </text:span><text:span text:style-name="T29">1 Chronicles 2:13-16 </text:span><text:span text:style-name="T90">you may notice that there is no proof that these two men are the same person </text:span><text:span text:style-name="T91">nor will you find proof of that anywhere else in the Bible.</text:span></text:p>
        </text:list-item>
        <text:list-item>
          <text:p text:style-name="P31"><text:span text:style-name="T92">There are two other mentions of a Nahash in the Bible, one is an Ammonite king </text:span><text:span text:style-name="T93">(8 verses) </text:span><text:span text:style-name="T92">and the other is the city of Nahash </text:span><text:span text:style-name="T93">(1 verse). </text:span></text:p>
        </text:list-item>
        <text:list-item>
          <text:p text:style-name="P31"><text:span text:style-name="T94">We can’t prove that</text:span><text:span text:style-name="T95"> Nahash </text:span><text:span text:style-name="T96">the ancestor of Abigail </text:span><text:span text:style-name="T95">is the same man as Nahash the Ammonite king.</text:span></text:p>
        </text:list-item>
        <text:list-item>
          <text:p text:style-name="P32"><text:span text:style-name="T91">W</text:span><text:span text:style-name="T97">e can’t even prove whether the “Nahash” in </text:span><text:span text:style-name="T29">2 Samuel 17:25</text:span><text:span text:style-name="T97"> is male or female</text:span><text:span text:style-name="T98">.</text:span></text:p>
        </text:list-item>
      </text:list>
      <text:p text:style-name="P33"/>
      <text:p text:style-name="P34"><text:soft-page-break/><text:span text:style-name="T99">G</text:span><text:span text:style-name="T100">od will never tell you to do something that </text:span><text:span text:style-name="T101">His word says not to do.</text:span></text:p>
      <text:list text:continue-numbering="true" text:style-name="L1">
        <text:list-item>
          <text:p text:style-name="P35"><text:span text:style-name="T102">In </text:span><text:span text:style-name="T29">Exodus 20:13</text:span><text:span text:style-name="T102"> God </text:span><text:span text:style-name="T103">commands</text:span><text:span text:style-name="T102"> “</text:span><text:span text:style-name="T104">Thou shalt not kill.</text:span><text:span text:style-name="T102">”</text:span></text:p>
          <text:list>
            <text:list-item>
              <text:p text:style-name="P36"><text:span text:style-name="T102">A</text:span><text:span text:style-name="T105">ll throughout the conquest of Canaan (</text:span><text:span text:style-name="T29">Joshua</text:span><text:span text:style-name="T105">), </text:span><text:span text:style-name="T106">early in king Saul’s reign, and all throughout</text:span><text:span text:style-name="T107"> </text:span><text:span text:style-name="T105">king David’s conquests and expansion of Israel</text:span><text:span text:style-name="T106"> </text:span><text:span text:style-name="T108">(</text:span><text:span text:style-name="T29">1 Samuel</text:span><text:span text:style-name="T108">→</text:span><text:span text:style-name="T29">1 Chronicles</text:span><text:span text:style-name="T108">) </text:span><text:span text:style-name="T105">God repeatedly instructs </text:span><text:span text:style-name="T107">the children of Israel to destroy </text:span><text:span text:style-name="T109">many</text:span><text:span text:style-name="T107"> different peoples.</text:span></text:p>
            </text:list-item>
            <text:list-item>
              <text:p text:style-name="P36"><text:span text:style-name="T110">To destroy is the same as to slay which is the same as to cause to perish which is the same as to cut off (</text:span><text:span text:style-name="T111">Est 3:13</text:span><text:span text:style-name="T110">, </text:span><text:span text:style-name="T111">8:11</text:span><text:span text:style-name="T110">, </text:span><text:span text:style-name="T111">Eze 25:7</text:span><text:span text:style-name="T110">)</text:span><text:span text:style-name="T107">.</text:span></text:p>
            </text:list-item>
            <text:list-item>
              <text:p text:style-name="P36"><text:span text:style-name="T112">Phinehas and his descendants are blessed by God for killing two people </text:span><text:span text:style-name="T113">without even being commanded to do so (</text:span><text:span text:style-name="T114">Num 25:7-</text:span><text:span text:style-name="T115">13</text:span><text:span text:style-name="T116">).</text:span></text:p>
            </text:list-item>
          </text:list>
        </text:list-item>
        <text:list-item>
          <text:p text:style-name="P37"><text:span text:style-name="T107">I</text:span><text:span text:style-name="T103">n </text:span><text:span text:style-name="T29">Mark 16:15</text:span><text:span text:style-name="T103"> God commands “</text:span><text:span text:style-name="T117">Go ye into all the world, and preach the gospel to every creature.</text:span><text:span text:style-name="T103">” </text:span><text:span text:style-name="T118">to His disciples, which they fulfilled (</text:span><text:span text:style-name="T29">Colossians 1:23</text:span><text:span text:style-name="T118">).</text:span></text:p>
          <text:list>
            <text:list-item>
              <text:p text:style-name="P38"><text:span text:style-name="T119">In </text:span><text:span text:style-name="T29">Acts 16:6</text:span><text:span text:style-name="T119"> Paul </text:span><text:span text:style-name="T120">and </text:span><text:span text:style-name="T119">Timothy </text:span><text:span text:style-name="T121">were “forbidden of the Holy Ghost to preach the word in Asia”</text:span></text:p>
            </text:list-item>
            <text:list-item>
              <text:p text:style-name="P39"><text:span text:style-name="T121">In </text:span><text:span text:style-name="T29">Acts 16:7</text:span><text:span text:style-name="T121"> Paul </text:span><text:span text:style-name="T122">and </text:span><text:span text:style-name="T121">Timothy</text:span><text:span text:style-name="T123"> </text:span><text:span text:style-name="T121">“assayed to go into Bithynia: but the Spirit suffered them not.”</text:span></text:p>
            </text:list-item>
          </text:list>
        </text:list-item>
        <text:list-item>
          <text:p text:style-name="P40"><text:span text:style-name="T29">Exodus 20:14</text:span> “<text:span text:style-name="T124">Thou shalt not commit adultery.</text:span>”</text:p>
          <text:list>
            <text:list-item>
              <text:p text:style-name="P39"><text:span text:style-name="T29">Leviticus 20:10</text:span><text:span text:style-name="T121"> “</text:span><text:span text:style-name="T125">And the man that committeth adultery with another man's wife, even he that committeth adultery with his neighbour's wife, </text:span><text:span text:style-name="T126">the adulterer and the adulteress shall surely be put to death.</text:span><text:span text:style-name="T121">”</text:span></text:p>
            </text:list-item>
            <text:list-item>
              <text:p text:style-name="P41"><text:span text:style-name="T127">Read </text:span><text:span text:style-name="T29">John 8:1-11</text:span><text:span text:style-name="T127">. </text:span><text:span text:style-name="T128">What is God’s command in v</text:span><text:span text:style-name="T29">7</text:span><text:span text:style-name="T128">?</text:span><text:span text:style-name="T129"> </text:span><text:span text:style-name="T128">Is it exactly what He commanded in </text:span><text:span text:style-name="T29">Lev 20:10</text:span><text:span text:style-name="T128">?</text:span></text:p>
            </text:list-item>
          </text:list>
        </text:list-item>
        <text:list-item>
          <text:p text:style-name="P42"><text:span text:style-name="T130">In </text:span><text:span text:style-name="T29">Esther 8:8</text:span><text:span text:style-name="T131"> </text:span><text:span text:style-name="T130">we read that in king Ahasuerus’s empire what is written in the king’s name cannot be reversed. </text:span><text:span text:style-name="T132">So</text:span><text:span text:style-name="T130">, his advice </text:span><text:span text:style-name="T133">for</text:span><text:span text:style-name="T130"> Esther </text:span><text:span text:style-name="T134">to save her people </text:span><text:span text:style-name="T130">is to write a new command </text:span><text:span text:style-name="T135">in his name</text:span><text:span text:style-name="T136">. T</text:span><text:span text:style-name="T137">his </text:span><text:span text:style-name="T138">seemingly</text:span><text:span text:style-name="T137"> minor detail about </text:span><text:span text:style-name="T139">laws in the</text:span><text:span text:style-name="T137"> Persian empire </text:span><text:span text:style-name="T140">was </text:span><text:span text:style-name="T141">not</text:span><text:span text:style-name="T140"> put here by </text:span><text:span text:style-name="T142">God by </text:span><text:span text:style-name="T140">accident.</text:span></text:p>
          <text:list>
            <text:list-item>
              <text:p text:style-name="P42"><text:span text:style-name="T143">I</text:span><text:span text:style-name="T144">n your imagination</text:span><text:span text:style-name="T145"> replace the king with God the Father and Esther with Jesus</text:span><text:span text:style-name="T144">. </text:span><text:span text:style-name="T146">Now you have a picture of</text:span><text:span text:style-name="T147"> what God did from the Old testament to the New testament.</text:span><text:span text:style-name="T140"> </text:span><text:span text:style-name="T148">He offered Himself, to save His people. </text:span><text:span text:style-name="T149">Moreover, </text:span><text:span text:style-name="T150">that seemingly minor detail is written because</text:span><text:span text:style-name="T151"> i</text:span><text:span text:style-name="T152">t teaches us</text:span><text:span text:style-name="T151"> how </text:span><text:span text:style-name="T150">God </text:span><text:span text:style-name="T151">runs His </text:span><text:span text:style-name="T150">kingdom</text:span><text:span text:style-name="T149">. </text:span><text:span text:style-name="T153">Keeping the word of God </text:span><text:span text:style-name="T154">includes</text:span><text:span text:style-name="T155"> any commands that He may give us at any time (by His word, or by His Spirit) (</text:span><text:span text:style-name="T156">Ecc 12:13,14</text:span><text:span text:style-name="T155">).</text:span></text:p>
            </text:list-item>
          </text:list>
        </text:list-item>
      </text:list>
      <text:p text:style-name="P7"/>
      <text:p text:style-name="P43"><text:span text:style-name="T157">W</text:span><text:span text:style-name="T158">orking on Sunday is </text:span><text:span text:style-name="T159">disrespectful/</text:span><text:span text:style-name="T158">evil/sin.</text:span></text:p>
      <text:list text:continue-numbering="true" text:style-name="L1">
        <text:list-item>
          <text:p text:style-name="P44"><text:span text:style-name="T160">Judging someone, for any reason, based on whether they do or don’t work on </text:span><text:span text:style-name="T161">S</text:span><text:span text:style-name="T160">unday is sin </text:span><text:span text:style-name="T162">itself</text:span><text:span text:style-name="T160">. </text:span><text:span text:style-name="T163">Moreover, what is considered sin </text:span><text:span text:style-name="T164">defined </text:span><text:span text:style-name="T163">by God extends far beyond just that:</text:span></text:p>
          <text:list>
            <text:list-item>
              <text:p text:style-name="P45"><text:span text:style-name="T29">Colossians 2:16,17</text:span><text:span text:style-name="T165"> “</text:span><text:span text:style-name="T166">Let no man</text:span><text:span text:style-name="T165"> therefore </text:span><text:span text:style-name="T166">judge you</text:span><text:span text:style-name="T165"> in </text:span><text:span text:style-name="T167">meat</text:span><text:span text:style-name="T165">, or in </text:span><text:span text:style-name="T167">drink</text:span><text:span text:style-name="T165">, or </text:span><text:span text:style-name="T168">in respect of an holyday</text:span><text:span text:style-name="T165">, or of the </text:span><text:span text:style-name="T167">new moon</text:span><text:span text:style-name="T165">, or </text:span><text:span text:style-name="T168">of the sabbath days</text:span><text:span text:style-name="T165">: Which are a shadow of things to come; but the body is of Christ.”</text:span></text:p>
            </text:list-item>
            <text:list-item>
              <text:p text:style-name="P46"><text:span text:style-name="T169">Take very careful note</text:span><text:span text:style-name="T162"> that </text:span><text:span text:style-name="T169">that </text:span><text:span text:style-name="T170">verse </text:span><text:span text:style-name="T162">covers a lot more than just </text:span><text:span text:style-name="T171">what we do or don’t do on </text:span><text:span text:style-name="T162">Saturday (</text:span><text:span text:style-name="T29">Mar 2:27</text:span><text:span text:style-name="T162">) and Sunday </text:span><text:span text:style-name="T172">(</text:span><text:span text:style-name="T29">Rev 1:10</text:span><text:span text:style-name="T172">)</text:span><text:span text:style-name="T162">.</text:span></text:p>
            </text:list-item>
            <text:list-item>
              <text:p text:style-name="P47"><text:span text:style-name="T173">N</text:span><text:span text:style-name="T174">otice that the things listed are all of the law (</text:span><text:span text:style-name="T29">Heb 10:1</text:span><text:span text:style-name="T174">)? </text:span><text:span text:style-name="T29">Romans </text:span><text:span text:style-name="T175">6:14,15, </text:span><text:span text:style-name="T29">10:4</text:span><text:span text:style-name="T176">, </text:span><text:span text:style-name="T177">Gal 5:18.</text:span></text:p>
            </text:list-item>
          </text:list>
        </text:list-item>
      </text:list>
      <text:p text:style-name="P48"/>
      <text:p text:style-name="P49"/>
      <text:p text:style-name="P50"><text:span text:style-name="T178">S</text:span><text:span text:style-name="T179">amuel is of the tribe of Ephraim.</text:span></text:p>
      <text:list text:continue-numbering="true" text:style-name="L1">
        <text:list-item>
          <text:p text:style-name="P51"><text:span text:style-name="T180">T</text:span><text:span text:style-name="T181">o prove Samuel’s lineage </text:span><text:span text:style-name="T182">we must</text:span><text:span text:style-name="T181"> take three different </text:span><text:span text:style-name="T183">genealogies</text:span><text:span text:style-name="T181"> in three different places and put them all together </text:span><text:span text:style-name="T184">(it’s a lot of fun if you like putting puzzles together). </text:span><text:span text:style-name="T185">You’ll need</text:span><text:span text:style-name="T186"> </text:span><text:span text:style-name="T29">1 Samuel 1:1,2</text:span> and <text:span text:style-name="T29">1 Chronicles 6:22-28, 33-38</text:span><text:span text:style-name="T186">. Here are some more pieces </text:span><text:span text:style-name="T187">that fill out all of his genealogy that was revealed to us</text:span><text:span text:style-name="T186">: </text:span><text:span text:style-name="T29">Gen 11:24</text:span><text:span text:style-name="T188">, </text:span><text:span text:style-name="T29">11:29</text:span><text:span text:style-name="T188">/</text:span><text:span text:style-name="T29">17:15</text:span><text:span text:style-name="T188">, </text:span><text:span text:style-name="T29">11:26</text:span><text:span text:style-name="T188">/</text:span><text:span text:style-name="T29">Jos 24:2</text:span><text:span text:style-name="T188">, </text:span><text:span text:style-name="T29">21:3</text:span><text:span text:style-name="T188">, </text:span><text:span text:style-name="T29">25:26</text:span><text:span text:style-name="T188">/</text:span><text:span text:style-name="T29">38:28</text:span><text:span text:style-name="T188">, </text:span><text:span text:style-name="T29">29:35</text:span><text:span text:style-name="T188">, </text:span><text:span text:style-name="T29">29:34</text:span><text:span text:style-name="T189">, </text:span><text:span text:style-name="T29">46:11</text:span><text:span text:style-name="T189">, </text:span><text:span text:style-name="T29">1 Sam 1:20</text:span><text:span text:style-name="T189">, </text:span><text:span text:style-name="T29">8:2</text:span><text:span text:style-name="T189">.</text:span></text:p>
        </text:list-item>
        <text:list-item>
          <text:p text:style-name="P40"><text:span text:style-name="T184">T</text:span><text:span text:style-name="T190">he truth is that Samuel is a </text:span><text:span text:style-name="T191">Ramathite </text:span><text:span text:style-name="T192">(from the city of Ramah)</text:span><text:span text:style-name="T191">, a </text:span><text:span text:style-name="T190">Levite (by </text:span><text:span text:style-name="T193">ancestry</text:span><text:span text:style-name="T190">), and an Eph</text:span><text:span text:style-name="T194">rathite</text:span><text:span text:style-name="T190"> (</text:span><text:span text:style-name="T195">from mount Ephraim</text:span><text:span text:style-name="T192">). B</text:span><text:span text:style-name="T196">y calling him an Ephrathite and putting that together with </text:span><text:span text:style-name="T29">1 Samuel 1:19</text:span><text:span text:style-name="T196"> </text:span><text:span text:style-name="T197">we know </text:span><text:span text:style-name="T198">which</text:span><text:span text:style-name="T197"> Ramah Samuel, Elkanah, and Hannah lived in </text:span><text:span text:style-name="T192">of which there are four that we know of</text:span><text:span text:style-name="T197">. </text:span><text:span text:style-name="T192">There is</text:span><text:span text:style-name="T199"> </text:span>Ramah<text:span text:style-name="T200">H7414</text:span> in<text:span text:style-name="T195"> </text:span><text:span text:style-name="T201">the</text:span><text:span text:style-name="T195"> land of Benjamin,</text:span> <text:span text:style-name="T202">a Ramath</text:span><text:span text:style-name="T203">H7414</text:span><text:span text:style-name="T202"> in the south in Simeon, a Ramah</text:span><text:span text:style-name="T203">H7414</text:span><text:span text:style-name="T202"> in the north in Asher, </text:span><text:span text:style-name="T204">and </text:span><text:span text:style-name="T202">a Ramah</text:span><text:span text:style-name="T203">H7414</text:span><text:span text:style-name="T205"> </text:span><text:span text:style-name="T206">in the north in Naphtali</text:span><text:span text:style-name="T190">.</text:span></text:p>
        </text:list-item>
      </text:list>
      <text:p text:style-name="P52"/>
      <text:p text:style-name="P53"/>
      <text:p text:style-name="P54"><text:span text:style-name="T157">S</text:span><text:span text:style-name="T207">atan understands or knows God’s word better than reborn humans can/</text:span><text:span text:style-name="T208">do</text:span><text:span text:style-name="T207">.</text:span></text:p>
      <text:list text:continue-numbering="true" text:style-name="L1">
        <text:list-item>
          <text:p text:style-name="P55">Read <text:span text:style-name="T29">John 8:43-47</text:span></text:p>
          <text:list>
            <text:list-item>
              <text:p text:style-name="P55"><text:span text:style-name="T209">T</text:span><text:span text:style-name="T210">here is no truth in him </text:span><text:span text:style-name="T211">(</text:span><text:span text:style-name="T29">John 17:17</text:span>).</text:p>
            </text:list-item>
            <text:list-item>
              <text:p text:style-name="P56">He cannot hear the word of God.</text:p>
            </text:list-item>
            <text:list-item>
              <text:p text:style-name="P56">He cannot believe the word of God.</text:p>
            </text:list-item>
          </text:list>
        </text:list-item>
        <text:list-item>
          <text:p text:style-name="P55"><text:span text:style-name="T209">I</text:span><text:span text:style-name="T212">f you don’t know God’s word </text:span><text:span text:style-name="T213">very</text:span><text:span text:style-name="T214"> </text:span><text:span text:style-name="T212">well Satan can and will </text:span><text:span text:style-name="T215">easily</text:span><text:span text:style-name="T212"> </text:span><text:span text:style-name="T216">beguile</text:span><text:span text:style-name="T217"> you into thinking he knows the truth </text:span><text:span text:style-name="T218">(</text:span><text:span text:style-name="T29">Isaiah 14:14b</text:span><text:span text:style-name="T218">) </text:span><text:span text:style-name="T217">but what he says </text:span><text:span text:style-name="T219">can never be entirely the truth</text:span><text:span text:style-name="T217">. </text:span><text:span text:style-name="T220">Regardless, the Holy Ghost knows God’s word better than </text:span><text:span text:style-name="T221">anyone</text:span><text:span text:style-name="T220"> ever will, so let Him be your guide </text:span><text:span text:style-name="T222">(</text:span><text:span text:style-name="T223">John 16:13</text:span><text:span text:style-name="T222">)</text:span><text:span text:style-name="T220">.</text:span></text:p>
          <text:list>
            <text:list-item>
              <text:p text:style-name="P55"><text:span text:style-name="T224">C</text:span><text:span text:style-name="T225">ompare </text:span><text:span text:style-name="T226">exactly </text:span><text:span text:style-name="T225">what Satan said in </text:span><text:span text:style-name="T29">Matthew 4:6</text:span><text:span text:style-name="T225">/</text:span><text:span text:style-name="T29">Luke 4:10,11</text:span><text:span text:style-name="T225"> to </text:span><text:span text:style-name="T29">Psalm 91:11,12</text:span><text:span text:style-name="T225">.</text:span></text:p>
            </text:list-item>
            <text:list-item>
              <text:p text:style-name="P55"><text:span text:style-name="T227">He takes away “</text:span><text:span text:style-name="T228">to keep thee in all thy ways</text:span><text:span text:style-name="T227">” and he adds “</text:span><text:span text:style-name="T228">at </text:span><text:span text:style-name="T229">any</text:span><text:span text:style-name="T228"> time</text:span><text:span text:style-name="T227">”. </text:span><text:span text:style-name="T230">Deu 4:2</text:span><text:span text:style-name="T231">, </text:span><text:span text:style-name="T230">12:32</text:span><text:span text:style-name="T231">, </text:span><text:span text:style-name="T230">Rev 22:18,19</text:span><text:span text:style-name="T231">)</text:span></text:p>
            </text:list-item>
          </text:list>
        </text:list-item>
      </text:list>
      <text:p text:style-name="P57"/>
      <text:p text:style-name="P57"/>
      <text:p text:style-name="P58"><text:soft-page-break/><text:span text:style-name="T157">J</text:span><text:span text:style-name="T232">esus’ command i</text:span><text:span text:style-name="T103">n </text:span><text:span text:style-name="T29">Mark 16:15</text:span><text:span text:style-name="T103"> “</text:span><text:span text:style-name="T117">Go ye into all the world, and preach the gospel to every creature.</text:span><text:span text:style-name="T103">” </text:span><text:span text:style-name="T232">applies to every </text:span><text:span text:style-name="T233">reborn human </text:span><text:span text:style-name="T234">alive</text:span><text:span text:style-name="T232"> today.</text:span></text:p>
      <text:p text:style-name="P59"/>
      <table:table table:name="Table2" table:style-name="Table2">
        <table:table-column table:style-name="Table2.A"/>
        <table:table-row>
          <table:table-cell table:style-name="Table2.A1" office:value-type="string">
            <text:p text:style-name="P60"><text:span text:style-name="T29">Mark 16:14-18</text:span><text:span text:style-name="T235"> (cf. </text:span><text:span text:style-name="T236">Matthew 28:16-20</text:span><text:span text:style-name="T235">, </text:span><text:span text:style-name="T237">Luke 24:33-</text:span><text:span text:style-name="T238">53</text:span><text:span text:style-name="T235">)</text:span></text:p>
            <text:p text:style-name="P61"><text:span text:style-name="T200">14</text:span> ¶ Afterward <text:span text:style-name="T239">he</text:span> appeared unto <text:span text:style-name="T240">the eleven</text:span> as they sat at meat, and upbraided <text:span text:style-name="T240">them</text:span> with <text:span text:style-name="T240">their</text:span> unbelief and hardness of heart, because <text:span text:style-name="T240">they</text:span> believed not them which had seen <text:span text:style-name="T239">him</text:span> after <text:span text:style-name="T239">he</text:span> was risen.</text:p>
            <text:p text:style-name="P61"><text:span text:style-name="T200">15</text:span> And <text:span text:style-name="T239">he</text:span> said unto <text:span text:style-name="T240">them</text:span>, <text:span text:style-name="T241">Go </text:span><text:span text:style-name="T242">ye</text:span><text:span text:style-name="T241"> into all the world, and preach the gospel to every creature.</text:span></text:p>
            <text:p text:style-name="P61"><text:span text:style-name="T200">16</text:span> <text:span text:style-name="T243">He that believeth</text:span><text:span text:style-name="T241"> and is baptized shall be saved; but he that believeth not shall be damned.</text:span></text:p>
            <text:p text:style-name="P61"><text:span text:style-name="T200">17</text:span> <text:span text:style-name="T241">And these signs shall follow </text:span><text:span text:style-name="T243">them that believe</text:span><text:span text:style-name="T241">; In my name shall </text:span><text:span text:style-name="T243">they</text:span><text:span text:style-name="T241"> cast out devils; </text:span><text:span text:style-name="T243">they</text:span><text:span text:style-name="T241"> shall speak with new tongues;</text:span></text:p>
            <text:p text:style-name="P61"><text:span text:style-name="T200">18</text:span> <text:span text:style-name="T243">They</text:span><text:span text:style-name="T241"> shall take up serpents; and if </text:span><text:span text:style-name="T243">they</text:span><text:span text:style-name="T241"> drink any deadly thing, it shall not hurt </text:span><text:span text:style-name="T243">them</text:span><text:span text:style-name="T241">; </text:span><text:span text:style-name="T243">they</text:span><text:span text:style-name="T241"> shall lay hands on the sick, and they shall recover.</text:span></text:p>
          </table:table-cell>
        </table:table-row>
      </table:table>
      <text:p text:style-name="P62"/>
      <text:p text:style-name="P63"><text:span text:style-name="T244">Notice that </text:span><text:span text:style-name="T245">I color coded the pronouns and their </text:span><text:span text:style-name="T246">respective </text:span><text:span text:style-name="T245">antecedents. </text:span><text:span text:style-name="T247">Now, take verse </text:span><text:span text:style-name="T29">15</text:span><text:span text:style-name="T247"> </text:span><text:span text:style-name="T248">out of its context</text:span><text:span text:style-name="T247"> and</text:span><text:span text:style-name="T249"> what is the antecedent </text:span><text:span text:style-name="T250">(noun) </text:span><text:span text:style-name="T249">to</text:span><text:span text:style-name="T247"> the </text:span><text:span text:style-name="T251">pronoun</text:span><text:span text:style-name="T247"> “ye”? </text:span><text:span text:style-name="T252">Anyone and everyone. </text:span><text:span text:style-name="T253">T</text:span><text:span text:style-name="T254">hat’s only possible </text:span><text:span text:style-name="T255">if</text:span><text:span text:style-name="T254"> you take it out of it’s context. In </text:span><text:span text:style-name="T256">their </text:span><text:span text:style-name="T254">context, both pronouns “ye” and “them” in verse </text:span><text:span text:style-name="T29">15</text:span><text:span text:style-name="T254"> point to the </text:span><text:span text:style-name="T257">noun (</text:span><text:span text:style-name="T254">antecedent</text:span><text:span text:style-name="T257">)</text:span><text:span text:style-name="T254"> “the eleven” in verse </text:span><text:span text:style-name="T29">14</text:span><text:span text:style-name="T254">.</text:span></text:p>
      <text:p text:style-name="P63"/>
      <text:p text:style-name="P63"><text:span text:style-name="T258">Moreover, scripture itself also confirms the fulfillment of that </text:span><text:span text:style-name="T259">specific </text:span><text:span text:style-name="T258">command in the </text:span><text:span text:style-name="T260">past</text:span><text:span text:style-name="T258"> tense:</text:span></text:p>
      <text:p text:style-name="P64"/>
      <table:table table:name="Table3" table:style-name="Table3">
        <table:table-column table:style-name="Table3.A"/>
        <table:table-row>
          <table:table-cell table:style-name="Table3.A1" office:value-type="string">
            <text:p text:style-name="P65">Colossians 1:23</text:p>
            <text:p text:style-name="P66">If ye continue in the faith grounded and settled, and be not moved away from the hope of <text:span text:style-name="T240">the gospel</text:span>, which ye have heard, and <text:span text:style-name="T240">which </text:span><text:span text:style-name="T261">was</text:span><text:span text:style-name="T262"> preach</text:span><text:span text:style-name="T263">ed</text:span><text:span text:style-name="T240"> to every creature which is under heaven</text:span>; whereof I Paul am made a minister;</text:p>
          </table:table-cell>
        </table:table-row>
      </table:table>
      <text:p text:style-name="P67"/>
      <text:p text:style-name="P68">Notice that Paul was a made a minister <text:span text:style-name="T264">to</text:span> what was preached<text:span text:style-name="T265">. </text:span><text:span text:style-name="T266">He was not one of the eleven.</text:span></text:p>
      <text:p text:style-name="P69"/>
      <text:p text:style-name="P70"><text:span text:style-name="T267">Summary of s</text:span>piritual gift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5">1 Corinthians 12:1,<text:span text:style-name="T268">8-</text:span>11</text:p>
            <text:p text:style-name="P71"><text:span text:style-name="T200">1</text:span> Now concerning <text:span text:style-name="T269">spiritual gifts</text:span>, brethren, I would not have you ignorant.</text:p>
            <text:p text:style-name="P71"><text:span text:style-name="T200">8</text:span> For to one is given by the Spirit <text:span text:style-name="T240">the word of wisdom</text:span>; to another <text:span text:style-name="T270">the word of knowledge</text:span> by the same Spirit;</text:p>
            <text:p text:style-name="P71"><text:span text:style-name="T200">9</text:span> To another <text:span text:style-name="T263">faith</text:span> by the same Spirit; to another the <text:span text:style-name="T262">gifts of healing</text:span> by the same Spirit;</text:p>
            <text:p text:style-name="P71"><text:span text:style-name="T200">10</text:span> To another the <text:span text:style-name="T271">working of miracles</text:span>; to another <text:span text:style-name="T272">prophecy</text:span>; to another <text:span text:style-name="T273">discerning of spirits</text:span>; to another <text:span text:style-name="T274">divers kinds of tongues</text:span>; to another the <text:span text:style-name="T275">interpretation of tongues</text:span>:</text:p>
            <text:p text:style-name="P71"><text:span text:style-name="T200">11</text:span> But all these worketh that one and the selfsame Spirit, <text:span text:style-name="T269">dividing to every man severally as he will</text:span>.</text:p>
          </table:table-cell>
        </table:table-row>
        <table:table-row>
          <table:table-cell table:style-name="Table4.A2" office:value-type="string">
            <text:p text:style-name="P72">1 Corinthians 12:28-30</text:p>
            <text:p text:style-name="Standard"><text:span text:style-name="T200">28</text:span> And God hath set some in the church, first <text:span text:style-name="T270">apostles</text:span>, secondarily <text:span text:style-name="T262">prophets</text:span>, thirdly <text:span text:style-name="T276">teachers</text:span>, after that <text:span text:style-name="T277">miracles</text:span>, then gifts of <text:span text:style-name="T272">healings</text:span>, <text:span text:style-name="T273">helps</text:span>, <text:span text:style-name="T278">governments</text:span>, <text:span text:style-name="T279">diversities of tongues</text:span>.</text:p>
            <text:p text:style-name="Standard"><text:span text:style-name="T200">29</text:span> Are all apostles? are all prophets? are all teachers? are all workers of miracles?</text:p>
            <text:p text:style-name="Standard"><text:span text:style-name="T200">30</text:span> Have all the gifts of healing? do all speak with tongues? do all interpret?</text:p>
          </table:table-cell>
        </table:table-row>
        <table:table-row>
          <table:table-cell table:style-name="Table4.A2" office:value-type="string">
            <text:p text:style-name="P65">Ephesians 4:8-12</text:p>
            <text:p text:style-name="P73"><text:span text:style-name="T200">8</text:span> Wherefore he saith, When he ascended up on high, he led captivity captive, and gave <text:span text:style-name="T269">gifts</text:span> unto men.</text:p>
            <text:p text:style-name="P73"><text:span text:style-name="T200">9</text:span> (Now that he ascended, what is it but that he also descended first into the lower parts of the earth?</text:p>
            <text:p text:style-name="P73"><text:span text:style-name="T200">10</text:span> He that descended is the same also that ascended up far above all heavens, that he might fill all things.)</text:p>
            <text:p text:style-name="P73"><text:span text:style-name="T200">11</text:span> And he gave <text:span text:style-name="T269">some</text:span>, <text:span text:style-name="T240">apostles</text:span>; and <text:span text:style-name="T269">some</text:span>, <text:span text:style-name="T262">prophets</text:span>; and <text:span text:style-name="T269">some</text:span>, <text:span text:style-name="T271">evangelists</text:span>; and <text:span text:style-name="T269">some</text:span>, <text:span text:style-name="T272">pastors and teachers</text:span>;</text:p>
            <text:p text:style-name="P73"><text:span text:style-name="T200">12</text:span> For the perfecting of the saints, for the work of the ministry, for the edifying of the body of Christ:</text:p>
          </table:table-cell>
        </table:table-row>
      </table:table>
      <text:p text:style-name="P74"/>
      <text:p text:style-name="P75"><text:span text:style-name="T280">N</text:span><text:span text:style-name="T60">ot</text:span><text:span text:style-name="T281">ice</text:span><text:span text:style-name="T60"> that </text:span><text:span text:style-name="T282">only </text:span><text:span text:style-name="T283">some</text:span><text:span text:style-name="T282"> are given the gift of evangelism? </text:span><text:span text:style-name="T284">What do we see in the world today? Are all evangelists? </text:span><text:span text:style-name="T282">God </text:span><text:span text:style-name="T285">alone</text:span><text:span text:style-name="T282"> </text:span><text:span text:style-name="T286">is the distributor </text:span><text:span text:style-name="T287">(</text:span><text:span text:style-name="T288">1Cor 12:11</text:span><text:span text:style-name="T287">) </text:span><text:span text:style-name="T289">and administrator </text:span><text:span text:style-name="T290">(</text:span><text:span text:style-name="T291">2Cor 9:8-12</text:span><text:span text:style-name="T290">) </text:span><text:span text:style-name="T289">of </text:span><text:span text:style-name="T286">spiritual </text:span><text:span text:style-name="T282">gifts </text:span><text:span text:style-name="T284">and that’s exactly what we see Him doing in the world today</text:span><text:span text:style-name="T282">.</text:span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76"><text:span text:style-name="T292">1 Peter 3:15</text:span><text:line-break/>But sanctify the Lord God in your hearts: and <text:span text:style-name="T263">be ready always to give an answer to every man that asketh you a reason of the hope that is in you</text:span> with meekness and fear: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77"><text:soft-page-break/><text:span text:style-name="T157">P</text:span><text:span text:style-name="T293">reaching the </text:span><text:span text:style-name="T294">g</text:span><text:span text:style-name="T293">ospel is what saves people </text:span><text:span text:style-name="T295">or </text:span><text:span text:style-name="T296">people need to hear the gospel </text:span><text:span text:style-name="T297">or they can’t be saved.</text:span></text:p>
      <text:list xml:id="list123108154862570" text:continue-numbering="true" text:style-name="L1">
        <text:list-item>
          <text:p text:style-name="P78"><text:span text:style-name="T298">F</text:span><text:span text:style-name="T299">irst, know that preaching/proclaiming the gospel is a </text:span><text:span text:style-name="T300">work</text:span><text:span text:style-name="T299"> that men can do (you speak with your mouth; </text:span><text:span text:style-name="T301">it’s an action </text:span><text:span text:style-name="T302">which is </text:span><text:span text:style-name="T301">also known as a work</text:span><text:span text:style-name="T299">). </text:span><text:span text:style-name="T303">God makes it </text:span><text:span text:style-name="T304">crystal</text:span><text:span text:style-name="T303"> clear in </text:span><text:span text:style-name="T29">Ephesians 2:9a</text:span><text:span text:style-name="T303"> “Not of works”. </text:span><text:span text:style-name="T305">But, </text:span><text:span text:style-name="T306">let’s look at more:</text:span></text:p>
        </text:list-item>
        <text:list-item>
          <text:p text:style-name="P79"><text:span text:style-name="T307">In </text:span><text:span text:style-name="T29">John 8:43-47</text:span><text:span text:style-name="T308"> </text:span><text:span text:style-name="T307">we learn from Jesus</text:span><text:span text:style-name="T299">:</text:span></text:p>
          <text:list>
            <text:list-item>
              <text:p text:style-name="P80"><text:span text:style-name="T309">U</text:span><text:span text:style-name="T310">nsaved people</text:span><text:span text:style-name="T311"> cannot hear the word of God.</text:span></text:p>
            </text:list-item>
            <text:list-item>
              <text:p text:style-name="P80"><text:span text:style-name="T312">Unsaved people</text:span><text:span text:style-name="T311"> cannot believe</text:span><text:span text:style-name="T310"> the word of God.</text:span></text:p>
            </text:list-item>
          </text:list>
        </text:list-item>
        <text:list-item>
          <text:p text:style-name="P81"><text:span text:style-name="T313">Let that sink in because Jesus </text:span><text:span text:style-name="T314">Himself </text:span><text:span text:style-name="T315">and his words are </text:span><text:span text:style-name="T313">the word</text:span><text:span text:style-name="T316">s</text:span><text:span text:style-name="T313"> of God (</text:span><text:span text:style-name="T29">John 14:10</text:span><text:span text:style-name="T313">) </text:span><text:span text:style-name="T317">and those unbelieving </text:span><text:span text:style-name="T318">Jews </text:span><text:span text:style-name="T319">could not hear Him</text:span> nor <text:span text:style-name="T319">could they believe Him</text:span><text:span text:style-name="T320"> </text:span><text:span text:style-name="T321">(</text:span><text:span text:style-name="T29">Isaiah 6:9,10</text:span><text:span text:style-name="T322">, </text:span><text:span text:style-name="T29">29:10-12</text:span><text:span text:style-name="T321">).</text:span></text:p>
        </text:list-item>
        <text:list-item>
          <text:p text:style-name="P82"><text:span text:style-name="T313">The </text:span><text:span text:style-name="T323">King James </text:span><text:span text:style-name="T313">Bible is also the word of God (</text:span><text:span text:style-name="T29">2 Tim</text:span><text:span text:style-name="T324">othy</text:span><text:span text:style-name="T29"> 3:16</text:span><text:span text:style-name="T313">) and truth (</text:span><text:span text:style-name="T29">John 14:6, 17:17</text:span><text:span text:style-name="T313">) </text:span><text:span text:style-name="T325">that unsaved people </text:span><text:span text:style-name="T326">cannot hear, believe, </text:span><text:span text:style-name="T327">or understand</text:span> <text:span text:style-name="T328">(</text:span><text:span text:style-name="T329">1 Corinthians 2:14</text:span><text:span text:style-name="T328">)</text:span><text:span text:style-name="T325">.</text:span></text:p>
        </text:list-item>
        <text:list-item>
          <text:p text:style-name="P82"><text:span text:style-name="T330">Why do you think so many unsaved people flock to all the perverse translations of God’s word out there? We just read why: </text:span><text:span text:style-name="T331">because they can’t hear, believe or understand</text:span> <text:span text:style-name="T331">God’s word</text:span><text:span text:style-name="T330">. </text:span><text:span text:style-name="T332">It’s foolishness </text:span><text:span text:style-name="T333">to them</text:span><text:span text:style-name="T332">. So, they go to what is not foolishness </text:span><text:span text:style-name="T333">to them</text:span><text:span text:style-name="T332"> </text:span><text:span text:style-name="T334">which is </text:span><text:span text:style-name="T335">not of God</text:span><text:span text:style-name="T334">.</text:span></text:p>
        </text:list-item>
        <text:list-item>
          <text:p text:style-name="P83"><text:span text:style-name="T329">Ephesians 2:8-10</text:span> “<text:span text:style-name="T336">8</text:span><text:span text:style-name="T309"> For </text:span><text:span text:style-name="T337">by grace</text:span><text:span text:style-name="T309"> are ye saved </text:span><text:span text:style-name="T337">through faith</text:span><text:span text:style-name="T309">; </text:span><text:span text:style-name="T338">and that not of yourselves</text:span><text:span text:style-name="T309">: it is the gift of God: </text:span><text:span text:style-name="T336">9</text:span><text:span text:style-name="T309"> </text:span><text:span text:style-name="T337">Not of works</text:span><text:span text:style-name="T309">, lest any man should boast. </text:span><text:span text:style-name="T336">10</text:span><text:span text:style-name="T309"> For we are </text:span><text:span text:style-name="T337">his workmanship</text:span><text:span text:style-name="T309">, created in Christ Jesus unto good works, which God hath before ordained that we should walk in them.”</text:span></text:p>
        </text:list-item>
      </text:list>
      <text:list text:style-name="L2">
        <text:list-item>
          <text:p text:style-name="P84"><text:span text:style-name="T339">W</text:span><text:span text:style-name="T340">hen it says “</text:span><text:span text:style-name="T341">and that not of yourselves</text:span><text:span text:style-name="T340">” </text:span><text:span text:style-name="T303">w</text:span><text:span text:style-name="T340">hat do you think it is referring to? </text:span><text:span text:style-name="T303">The grace or the faith? If you choose only one how can you prove </text:span><text:span text:style-name="T342">it’s only referring to one or the other</text:span><text:span text:style-name="T303">? </text:span><text:span text:style-name="T342">As it is written, </text:span><text:span text:style-name="T343">both</text:span><text:span text:style-name="T342"> the grace and the faith are not of ourselves. </text:span><text:span text:style-name="T344">That teaches us that saving grace and saving faith do not come from </text:span><text:span text:style-name="T345">any</text:span><text:span text:style-name="T344"> man. </text:span><text:span text:style-name="T346">So </text:span><text:span text:style-name="T347">then</text:span><text:span text:style-name="T346">, where does saving faith come from?</text:span></text:p>
        </text:list-item>
        <text:list-item>
          <text:p text:style-name="P85"><text:span text:style-name="T29">Galatians 2:20</text:span><text:span text:style-name="T348"> “...</text:span><text:span text:style-name="T349">by </text:span><text:span text:style-name="T348">the faith of the Son of God...”</text:span></text:p>
        </text:list-item>
        <text:list-item>
          <text:p text:style-name="P86"><text:span text:style-name="T350">A person getting saved is </text:span><text:span text:style-name="T351">entirely</text:span><text:span text:style-name="T350"> the work of God, </text:span><text:span text:style-name="T352">otherwise someone could boast that they contributed </text:span><text:span text:style-name="T353">something </text:span><text:span text:style-name="T354">and that simply </text:span><text:span text:style-name="T355">has never and will never happen </text:span><text:span text:style-name="T356">(</text:span><text:span text:style-name="T29">Isaiah 42:8</text:span><text:span text:style-name="T356">).</text:span></text:p>
        </text:list-item>
        <text:list-item>
          <text:p text:style-name="P87"><text:span text:style-name="T357">If </text:span><text:span text:style-name="T358">you are more curious</text:span><text:span text:style-name="T357"> </text:span><text:span text:style-name="T359">how</text:span><text:span text:style-name="T357"> </text:span><text:span text:style-name="T358">God saves a person,</text:span><text:span text:style-name="T357"> Jesus tells us </text:span><text:span text:style-name="T358">a little more </text:span><text:span text:style-name="T357">in </text:span><text:span text:style-name="T29">John 6:44</text:span>. <text:span text:style-name="T360">There are more clues throughout scripture </text:span><text:span text:style-name="T361">such as </text:span><text:span text:style-name="T29">Psalm 19:7</text:span>, b<text:span text:style-name="T360">ut, understandably </text:span><text:span text:style-name="T362">and for good reasons</text:span><text:span text:style-name="T360">, we will never fully understand </text:span><text:span text:style-name="T362">the process</text:span><text:span text:style-name="T360"> this side of eternity. </text:span><text:span text:style-name="T363">The simple answer is: it’s entirely of God and doesn’t require anything more than Hi</text:span><text:span text:style-name="T364">m</text:span><text:span text:style-name="T363"> which is from everlasting to everlasting.</text:span></text:p>
        </text:list-item>
        <text:list-item>
          <text:p text:style-name="P88">How do you think God saves men and woman in parts of the world that never hear God’s word? Do you think God didn’t have a plan for those people and He just thought “ah well, can’t save em all”. Foolishness! God knew before the foundation of the world!</text:p>
        </text:list-item>
        <text:list-item>
          <text:p text:style-name="P89"><text:span text:style-name="T365">God wants everyone to be saved (</text:span><text:span text:style-name="T29">2 Peter 3:9</text:span><text:span text:style-name="T365">) </text:span><text:span text:style-name="T363">and He is the only one who could have </text:span><text:span text:style-name="T366">ever </text:span><text:span text:style-name="T363">or can </text:span><text:span text:style-name="T366">ever </text:span><text:span text:style-name="T363">do anything about it (</text:span><text:span text:style-name="T367">Psa 14:2,3</text:span><text:span text:style-name="T368">, </text:span><text:span text:style-name="T369">53:2,3</text:span><text:span text:style-name="T370">, </text:span><text:span text:style-name="T371">Rom 3:10,11, </text:span><text:span text:style-name="T372">John 6:44</text:span><text:span text:style-name="T363">)</text:span><text:span text:style-name="T365">.</text:span></text:p>
        </text:list-item>
        <text:list-item>
          <text:p text:style-name="P89"><text:span text:style-name="T365">Where do you think we get </text:span><text:span text:style-name="T373">the</text:span><text:span text:style-name="T365"> intense desire </text:span><text:span text:style-name="T373">for people to be saved </text:span><text:span text:style-name="T365">from? </text:span><text:span text:style-name="T374">That’s God’s desire. </text:span><text:span text:style-name="T375">But, let it be tempered with Wisdom and the word of God.</text:span></text:p>
        </text:list-item>
      </text:list>
      <text:p text:style-name="P90"/>
      <text:p text:style-name="P91">Misc Topics:</text:p>
      <text:list text:style-name="L3">
        <text:list-item>
          <text:p text:style-name="P92">Tithing is required (false): <text:span text:style-name="T376">tithing is of the law, which was the schoolmaster to bring us to Christ that we are no longer under: </text:span><text:span text:style-name="T377">Romans 6:14,15</text:span><text:span text:style-name="T376">, </text:span><text:span text:style-name="T377">10:4</text:span><text:span text:style-name="T376">, </text:span><text:span text:style-name="T377">Gal 3:10, </text:span><text:span text:style-name="T378">5:18, </text:span><text:span text:style-name="T379">1 Cor 16:2</text:span><text:span text:style-name="T380">, </text:span><text:span text:style-name="T379">2 Cor 9:7, </text:span><text:span text:style-name="T381">Mark 12:41-44</text:span><text:span text:style-name="T382">, </text:span><text:span text:style-name="T381">Luke 21:1-</text:span><text:span text:style-name="T383">4, Romans 12:1, </text:span><text:span text:style-name="T384">Psa 24:1, 1 Cor 6:20, </text:span><text:span text:style-name="T385">Deu 8:18, </text:span><text:span text:style-name="T386">Gal 5:9</text:span><text:span text:style-name="T387">.</text:span></text:p>
        </text:list-item>
        <text:list-item>
          <text:p text:style-name="P93">Calling spiritual leaders “father” <text:span text:style-name="T388">(it is sin)</text:span>: <text:span text:style-name="T292">Matthew 23:8-10</text:span></text:p>
        </text:list-item>
        <text:list-item>
          <text:p text:style-name="P94">The practice of celibacy <text:span text:style-name="T389">and </text:span><text:span text:style-name="T390">forbidding certain foods</text:span> (<text:span text:style-name="T390">doctrines</text:span> of devils): <text:span text:style-name="T391">1 Timothy 4:1-3</text:span></text:p>
        </text:list-item>
        <text:list-item>
          <text:p text:style-name="P95">Losing salvation: if you lost it you never had it to begin with <text:span text:style-name="T392">because you can’t lose what you can’t give</text:span>. <text:span text:style-name="T393">This doctrine is for those who believe in works-based salvation which directly counterdicts </text:span><text:span text:style-name="T394">Ephesians 2:8-10</text:span><text:span text:style-name="T393">. </text:span>Salvation isn’t dependent on <text:span text:style-name="T392">anything that </text:span>people do, it’s <text:span text:style-name="T392">both the gift and </text:span>the work of God and it is irrevocable (<text:span text:style-name="T292">Rom 11:29</text:span>).</text:p>
        </text:list-item>
        <text:list-item>
          <text:p text:style-name="P96">Jesus didn’t come in the flesh (<text:span text:style-name="T395">a deceiver and an antichrist</text:span>): <text:span text:style-name="T292">1 John 4:2,3</text:span>, <text:span text:style-name="T396">2 John 1:7</text:span></text:p>
        </text:list-item>
        <text:list-item>
          <text:p text:style-name="P97">The prosperity bad news (it can’t be called “gospel” because it’s worldy and sinful): <text:span text:style-name="T292">2 Cor 12:9</text:span></text:p>
          <text:list>
            <text:list-item>
              <text:p text:style-name="P97">In Hebrews <text:span text:style-name="T292">11</text:span>, the “hall of faith”, verse <text:span text:style-name="T292">37</text:span>, the saints of God are described as being “destitute” and immediately following that verse it is said of them “of whom the wor<text:span text:style-name="T397">l</text:span>d was not worthy”.</text:p>
            </text:list-item>
            <text:list-item>
              <text:p text:style-name="P98"><text:span text:style-name="T292">1 John 2:16</text:span>: the prosperity “gospel” falls into all three of these categories that are “not of the Father”</text:p>
            </text:list-item>
          </text:list>
        </text:list-item>
        <text:list-item>
          <text:p text:style-name="P99">We’re all the children of God (false): <text:span text:style-name="T292">John 8:44</text:span></text:p>
        </text:list-item>
        <text:list-item>
          <text:p text:style-name="P99">God loves everyone (false): <text:span text:style-name="T292">John 3:36</text:span>, <text:span text:style-name="T292">Romans 1:18</text:span>, <text:span text:style-name="T292">Eph 5:6</text:span>, <text:span text:style-name="T292">Col 3:6</text:span>, <text:span text:style-name="T398">Rev 14:9-11</text:span><text:span text:style-name="T399">.</text:span></text:p>
        </text:list-item>
        <text:list-item>
          <text:p text:style-name="P100">Christmas <text:span text:style-name="T400">(Saturnalia, Yule)</text:span>: a poor mimicry of <text:span text:style-name="T401">God’s goodness to </text:span><text:span text:style-name="T402">the </text:span><text:span text:style-name="T401">good and the evil every day. </text:span><text:span text:style-name="T403">Comes from </text:span><text:span text:style-name="T404">two </text:span><text:span text:style-name="T403">traditions of worshiping the sun. </text:span><text:span text:style-name="T405">God is always good and His mercy endures forever.</text:span></text:p>
        </text:list-item>
        <text:list-item>
          <text:p text:style-name="P101">Easter: what do bunnies and eggs have to do with God? Absolutely nothing. Much more so, it’s fertility goddess worship (Ashtoreth).</text:p>
          <text:list>
            <text:list-item>
              <text:p text:style-name="P102">The root for the English word “Easter” is the name of an Anglo-Saxon goddess of spring and fertility “Eostre/Ostara”.</text:p>
            </text:list-item>
          </text:list>
        </text:list-item>
        <text:list-item>
          <text:p text:style-name="P103">Halloween (Samhain, <text:span text:style-name="T406">inc. all saints day</text:span>): witchcraft, familiar spirits, <text:span text:style-name="T407">necromancy</text:span> (<text:span text:style-name="T292">Exodus 22:18</text:span>, <text:span text:style-name="T408">Lev 19:31</text:span><text:span text:style-name="T407">, </text:span><text:span text:style-name="T408">20:6,27</text:span><text:span text:style-name="T407">, </text:span><text:span text:style-name="T292">Deu 18:10-</text:span><text:span text:style-name="T408">12</text:span>). <text:span text:style-name="T409">The wages of sin is death. </text:span><text:span text:style-name="T410">If it’s associated with love of death it </text:span><text:span text:style-name="T411">is of the love of sin.</text:span></text:p>
        </text:list-item>
        <text:list-item>
          <text:p text:style-name="P104"><text:span text:style-name="T412">Valentine’s day (Lupercalia): </text:span><text:span text:style-name="T413">fertility </text:span><text:span text:style-name="T414">and evil spirit warding rituals</text:span><text:span text:style-name="T413"> (</text:span>wizards, sorcerers, see verses for Halloween<text:span text:style-name="T413">)</text:span></text:p>
        </text:list-item>
        <text:list-item>
          <text:p text:style-name="P105">Saint John’s eve (mixed with sun worship, burning fires which was believed to give strength to the sun)</text:p>
        </text:list-item>
        <text:list-item>
          <text:p text:style-name="P106">May day (sun worship, sorcery), <text:span text:style-name="T415">New years day (honor to Janus, a roman god), </text:span><text:span text:style-name="T416">Lent (it’s </text:span><text:span text:style-name="T417">closely </text:span><text:span text:style-name="T416">associat</text:span><text:span text:style-name="T417">ed </text:span><text:span text:style-name="T416">with easter; </text:span><text:span text:style-name="T417">some</text:span><text:span text:style-name="T416"> things “prescribed” </text:span><text:span text:style-name="T418">are commanded by God to be done at </text:span><text:span text:style-name="T419">all times or </text:span><text:span text:style-name="T416">when God command</text:span><text:span text:style-name="T419">s</text:span><text:span text:style-name="T416"> them, not when we choose, </text:span><text:span text:style-name="T419">and not how we choose them but </text:span><text:span text:style-name="T417">exactly </text:span><text:span text:style-name="T419">how God commanded them</text:span><text:span text:style-name="T416">).</text:span></text:p>
        </text:list-item>
      </text:list>
      <text:p text:style-name="P107"><text:soft-page-break/><text:span text:style-name="T157">T</text:span><text:span text:style-name="T420">he </text:span><text:span text:style-name="T421">w</text:span><text:span text:style-name="T420">ord of God </text:span><text:span text:style-name="T422">preached by man </text:span><text:span text:style-name="T420">is what gives unsaved people </text:span><text:span text:style-name="T423">saving </text:span><text:span text:style-name="T420">faith </text:span><text:span text:style-name="T423">or faith in God</text:span><text:span text:style-name="T420">.</text:span></text:p>
      <text:list text:continue-list="list123108154862570" text:style-name="L1">
        <text:list-item>
          <text:p text:style-name="P40"><text:span text:style-name="T424">If you haven’t already, read the previous topic, </text:span><text:span text:style-name="T425">especially </text:span><text:span text:style-name="T29">John 8:43-47</text:span> and <text:span text:style-name="T426">Ephesians 2:8-10</text:span><text:span text:style-name="T425">. </text:span><text:span text:style-name="T427">The faith that saves comes only from God, </text:span><text:span text:style-name="T428">specifically Jesus after God the Father draws a person to Jesus</text:span><text:span text:style-name="T427">. </text:span><text:span text:style-name="T429">Since it can’t be saving faith, </text:span><text:span text:style-name="T427">what </text:span><text:span text:style-name="T429">is</text:span><text:span text:style-name="T427"> this faith that we read about in </text:span><text:span text:style-name="T29">Romans 10:17</text:span>?</text:p>
        </text:list-item>
        <text:list-item>
          <text:p text:style-name="P108"><text:span text:style-name="T430">W</text:span><text:span text:style-name="T431">ho is the epistle </text:span><text:span text:style-name="T432">(letter) </text:span><text:span text:style-name="T431">of </text:span><text:span text:style-name="T29">Romans</text:span><text:span text:style-name="T431"> addressed to? </text:span><text:span text:style-name="T29">Romans 1:1-7</text:span>.</text:p>
          <text:list>
            <text:list-item>
              <text:list>
                <text:list-item>
                  <text:p text:style-name="P109"><text:span text:style-name="T433">v</text:span><text:span text:style-name="T29">3a</text:span><text:span text:style-name="T433"> “Concerning his Son Jesus Christ </text:span><text:span text:style-name="T434">our Lord</text:span><text:span text:style-name="T433">…” </text:span><text:span text:style-name="T435">(</text:span><text:span text:style-name="T29">1 Corinthians 12:3</text:span><text:span text:style-name="T435">).</text:span></text:p>
                </text:list-item>
                <text:list-item>
                  <text:p text:style-name="P110"><text:span text:style-name="T435">v</text:span><text:span text:style-name="T29">6</text:span><text:span text:style-name="T436"> “Among whom are </text:span><text:span text:style-name="T437">ye also the called of Jesus Christ</text:span><text:span text:style-name="T436">:”</text:span></text:p>
                </text:list-item>
                <text:list-item>
                  <text:p text:style-name="P111"><text:span text:style-name="T438">v</text:span><text:span text:style-name="T29">7</text:span><text:span text:style-name="T438"> “</text:span><text:span text:style-name="T439">To</text:span><text:span text:style-name="T438"> all that be in Rome, beloved of God, </text:span><text:span text:style-name="T440">called to be saints</text:span><text:span text:style-name="T438">:”</text:span></text:p>
                </text:list-item>
              </text:list>
            </text:list-item>
          </text:list>
        </text:list-item>
        <text:list-item>
          <text:p text:style-name="P112">So, as <text:span text:style-name="T441">saints</text:span>, what kind of faith <text:span text:style-name="T442">d</text:span>o we receive when we hear the word of God? <text:span text:style-name="T443">H</text:span>int: <text:span text:style-name="T443">when we read the word of God </text:span><text:span text:style-name="T444">we hear </text:span><text:span text:style-name="T445">it </text:span><text:span text:style-name="T444">in our spirit. </text:span><text:span text:style-name="T446">You’re hearing yourself read this right now. </text:span>It’s the kind of faith that edifies <text:span text:style-name="T447">(builds </text:span><text:span text:style-name="T448">up</text:span><text:span text:style-name="T447">)</text:span> <text:span text:style-name="T449">trust</text:span><text:span text:style-name="T2"> in God.</text:span></text:p>
          <text:list>
            <text:list-item>
              <text:p text:style-name="P113">Adam and Eve sinning and God <text:span text:style-name="T450">making</text:span> them coats of skins and preserved them and blessed them.</text:p>
            </text:list-item>
            <text:list-item>
              <text:p text:style-name="P114">When God rejected Cain’s sacrifice He didn’t reject him forever – He pleaded with him and taught him a better way.</text:p>
            </text:list-item>
            <text:list-item>
              <text:p text:style-name="P115">When Lamech learned of Cain <text:span text:style-name="T451">and committed murder himself he trusted</text:span> that God would protect him.</text:p>
            </text:list-item>
            <text:list-item>
              <text:p text:style-name="P116">Abel offering a<text:span text:style-name="T452">n acceptable</text:span> sacrifice long before the law was given</text:p>
            </text:list-item>
            <text:list-item>
              <text:p text:style-name="P116">Enoch walking with God <text:span text:style-name="T453">and His reward was </text:span><text:span text:style-name="T454">that God took him.</text:span></text:p>
            </text:list-item>
            <text:list-item>
              <text:p text:style-name="P117"><text:span text:style-name="T455">Noah building the a</text:span><text:span text:style-name="T456">r</text:span><text:span text:style-name="T457">k which had no engine or rudder.</text:span></text:p>
            </text:list-item>
            <text:list-item>
              <text:p text:style-name="P118">Noah’s family <text:span text:style-name="T458">(the seven on the ark with him) </text:span>trusted Noah because they trusted God.</text:p>
            </text:list-item>
            <text:list-item>
              <text:p text:style-name="P119">When Hagar left the babe to himself she was giving up and trusting God and He provided.</text:p>
            </text:list-item>
            <text:list-item>
              <text:p text:style-name="P120">Abram leaving <text:span text:style-name="T459">all that he knew</text:span> and settling <text:span text:style-name="T459">in a </text:span>far away <text:span text:style-name="T459">country.</text:span></text:p>
            </text:list-item>
            <text:list-item>
              <text:p text:style-name="P121">Abraham offering <text:span text:style-name="T460">the child of the promise on the altar of sacrifice</text:span>.</text:p>
            </text:list-item>
            <text:list-item>
              <text:p text:style-name="P122">Abraham pleading for any righteous that might be in Sodom and Gomorrah.</text:p>
            </text:list-item>
            <text:list-item>
              <text:p text:style-name="P123">The Hebrew midwives breaking the law and God blessed them.</text:p>
            </text:list-item>
            <text:list-item>
              <text:p text:style-name="P124">Moses carrying the knowledge that God would free the Hebrews by him for <text:span text:style-name="T461">at least </text:span>40 years.</text:p>
            </text:list-item>
            <text:list-item>
              <text:p text:style-name="P125">Moses interceding for the children of Israel.</text:p>
            </text:list-item>
            <text:list-item>
              <text:p text:style-name="P125">Moses commanding God to heal his sister Miriam after she sinned.</text:p>
            </text:list-item>
            <text:list-item>
              <text:p text:style-name="P126">Aaron holding his peace when <text:span text:style-name="T462">two of </text:span>his sons were devoured by fire from the LORD.</text:p>
            </text:list-item>
            <text:list-item>
              <text:p text:style-name="P127">Joshua commanding the sun and the moon to stand still.</text:p>
            </text:list-item>
            <text:list-item>
              <text:p text:style-name="P128">Joseph giving a commandment concerning his bones <text:span text:style-name="T463">hundreds of </text:span><text:span text:style-name="T464">years in advance.</text:span></text:p>
            </text:list-item>
            <text:list-item>
              <text:p text:style-name="P117"><text:span text:style-name="T465">Caleb seeing </text:span><text:span text:style-name="T466">his God bigger than </text:span><text:span text:style-name="T465">a land of giants and fortified cities.</text:span></text:p>
            </text:list-item>
            <text:list-item>
              <text:p text:style-name="P129">Phinehas thrusting his javelin through a man and a woman to stay the plague.</text:p>
            </text:list-item>
            <text:list-item>
              <text:p text:style-name="P130"><text:span text:style-name="T2">The </text:span><text:span text:style-name="T467">walls</text:span><text:span text:style-name="T2"> of Jericho.</text:span></text:p>
            </text:list-item>
            <text:list-item>
              <text:p text:style-name="P131">Gideon going to battle without weapons against a <text:span text:style-name="T468">significantly</text:span> overwhelming force.</text:p>
            </text:list-item>
            <text:list-item>
              <text:p text:style-name="P132">David <text:span text:style-name="T469">and </text:span><text:span text:style-name="T470">the bear, the lion, and Goliath.</text:span></text:p>
            </text:list-item>
            <text:list-item>
              <text:p text:style-name="P133">The kings of Israel and Judah even after God explained to Samuel that they had rejected Him.</text:p>
            </text:list-item>
            <text:list-item>
              <text:p text:style-name="P134">Zephaniah’s <text:span text:style-name="T471">pointed justice for the wicked.</text:span></text:p>
            </text:list-item>
            <text:list-item>
              <text:p text:style-name="P135"><text:span text:style-name="T472">Ruth’s patient endurance </text:span><text:span text:style-name="T473">leaving her homeland </text:span><text:span text:style-name="T474">and </text:span>proposing to Boaz.</text:p>
            </text:list-item>
            <text:list-item>
              <text:p text:style-name="P136"><text:span text:style-name="T2">Jonath</text:span><text:span text:style-name="T475">a</text:span><text:span text:style-name="T2">n and his armourbearer going up </text:span><text:span text:style-name="T475">against</text:span><text:span text:style-name="T2"> the Philistine garrison.</text:span></text:p>
            </text:list-item>
            <text:list-item>
              <text:p text:style-name="P137">Nehemiah’<text:span text:style-name="T476">s immediate response</text:span> when the king asked him what would he have him do.</text:p>
            </text:list-item>
            <text:list-item>
              <text:p text:style-name="P138">The rebuilding of Jerusalem <text:span text:style-name="T477">even during</text:span> <text:span text:style-name="T478">troublous times.</text:span></text:p>
            </text:list-item>
            <text:list-item>
              <text:p text:style-name="P139">The encouragement of Haggai and Zechariah.</text:p>
            </text:list-item>
            <text:list-item>
              <text:p text:style-name="P140">Ezra’s <text:span text:style-name="T479">gentle </text:span>leadership.</text:p>
            </text:list-item>
            <text:list-item>
              <text:p text:style-name="P141">Nehemiah’s <text:span text:style-name="T480">ferocious pursuit of removing evil from </text:span>the house of God.</text:p>
            </text:list-item>
            <text:list-item>
              <text:p text:style-name="P142">Mordecai refusing to bow to Haman.</text:p>
            </text:list-item>
            <text:list-item>
              <text:p text:style-name="P143">Esther going before the king when it was against the law.</text:p>
            </text:list-item>
            <text:list-item>
              <text:p text:style-name="P137">“<text:span text:style-name="T481">Hast thou considered my servant Job”?</text:span></text:p>
            </text:list-item>
            <text:list-item>
              <text:p text:style-name="P144">Solomon’s request when <text:span text:style-name="T482">God gave him a blank check.</text:span></text:p>
            </text:list-item>
            <text:list-item>
              <text:p text:style-name="P145">Solomon wrote an entire book of what to expect out of a life without God: vanity.</text:p>
            </text:list-item>
            <text:list-item>
              <text:p text:style-name="P146">The parable of love (Song of Solomon): the love between a man and a woman as <text:span text:style-name="T483">a</text:span> figure of God’s unsearchable love <text:span text:style-name="T484">for us.</text:span></text:p>
            </text:list-item>
            <text:list-item>
              <text:p text:style-name="P136"><text:span text:style-name="T485">Isaiah </text:span><text:span text:style-name="T486">the faithful scribe </text:span><text:span text:style-name="T487">delivering God’s messages </text:span><text:span text:style-name="T488">for at least 41 years t</text:span><text:span text:style-name="T487">o</text:span><text:span text:style-name="T485"> a people </text:span><text:span text:style-name="T487">that </text:span><text:span text:style-name="T485">God said would not listen</text:span><text:span text:style-name="T487">.</text:span></text:p>
            </text:list-item>
            <text:list-item>
              <text:p text:style-name="P147">Jeremiah <text:span text:style-name="T489">enduring</text:span> the Babylonian exile.</text:p>
            </text:list-item>
            <text:list-item>
              <text:p text:style-name="P148">Daniel repeatedly defying the law <text:span text:style-name="T490">of the land.</text:span></text:p>
            </text:list-item>
            <text:list-item>
              <text:p text:style-name="P149">Hosea cherishing an adulterous woman.</text:p>
            </text:list-item>
            <text:list-item>
              <text:p text:style-name="P150">God’s <text:span text:style-name="T491">persistent</text:span> pursuit of <text:span text:style-name="T492">the perfection of </text:span>Jonah’s heart <text:span text:style-name="T493">and </text:span><text:span text:style-name="T494">leaving the ninety and nine for the lost sheep</text:span><text:span text:style-name="T493">.</text:span></text:p>
            </text:list-item>
            <text:list-item>
              <text:p text:style-name="P151"><text:span text:style-name="T495">Habakkuk’s </text:span><text:span text:style-name="T496">knowledge of impending destruction </text:span><text:span text:style-name="T497">and his faith in God to provide </text:span><text:span text:style-name="T498">even during extremely trying times.</text:span></text:p>
            </text:list-item>
            <text:list-item>
              <text:p text:style-name="P152">Simeon patiently waiting for the consolation of Israel <text:span text:style-name="T499">amidst a perverse and crooked nation.</text:span></text:p>
            </text:list-item>
            <text:list-item>
              <text:p text:style-name="P153"><text:span text:style-name="T500">Peter’s jump first, look later mindset</text:span><text:span text:style-name="T501"> and then </text:span><text:span text:style-name="T502">becoming the first bishop at Antioch, where they were first called Christians.</text:span></text:p>
            </text:list-item>
            <text:list-item>
              <text:p text:style-name="P154">Paul’s relentless <text:span text:style-name="T503">evangelism, </text:span><text:span text:style-name="T504">steadfast </text:span><text:span text:style-name="T505">leadership, </text:span><text:span text:style-name="T506">and determination through </text:span><text:span text:style-name="T507">trials no man can endure </text:span><text:span text:style-name="T508">alone.</text:span></text:p>
            </text:list-item>
            <text:list-item>
              <text:p text:style-name="P155">Timothy’s growth from a lad <text:span text:style-name="T509">with a faithful </text:span><text:span text:style-name="T510">mother and </text:span><text:span text:style-name="T509">grandm</text:span><text:span text:style-name="T510">other</text:span><text:span text:style-name="T509"> </text:span>to the first bishop of Ephesus.</text:p>
            </text:list-item>
            <text:list-item>
              <text:p text:style-name="P156">Philemon’s <text:span text:style-name="T511">triumphant </text:span>return to his master.</text:p>
            </text:list-item>
            <text:list-item>
              <text:p text:style-name="P157">The meekness of Jude.</text:p>
            </text:list-item>
            <text:list-item>
              <text:p text:style-name="P158">John being exiled to the isle of Patmos <text:span text:style-name="T512">to write </text:span><text:span text:style-name="T513">a summary of and the </text:span><text:span text:style-name="T512">conclusion </text:span><text:span text:style-name="T513">to</text:span><text:span text:style-name="T512"> the history of mankind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ackChancery" svg:font-family="BlackChancery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5in" fo:margin-bottom="0.15in" fo:margin-left="0.15in" fo:margin-right="0.1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7T08:40:42.208000000</meta:creation-date>
    <meta:editing-duration>PT23H37M14S</meta:editing-duration>
    <meta:editing-cycles>1057</meta:editing-cycles>
    <meta:generator>LibreOffice/26.2.4.2$Linux_X86_64 LibreOffice_project/64a984c51f4702dbd3710b13428c673a2f1292e7</meta:generator>
    <dc:title>Commonly held believes that are not truth</dc:title>
    <dc:date>2026-07-11T12:31:07.057842528</dc:date>
    <meta:document-statistic meta:table-count="4" meta:image-count="0" meta:object-count="0" meta:page-count="5" meta:paragraph-count="186" meta:word-count="4002" meta:character-count="21627" meta:non-whitespace-character-count="17949"/>
    <meta:template xlink:type="simple" xlink:actuate="onRequest" xlink:title="BibleStudyTemplate" xlink:href="../../../../AppData/Roaming/LibreOffice/4/user/template/BibleStudyTemplate.ott" meta:date="2025-05-27T08:40:41.280000000"/>
  </office:meta>
</office:document-meta>
</file>