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8" style:family="table">
      <style:table-properties style:width="7.9in" fo:margin-top="0in" fo:margin-bottom="0.079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7.9in" style:rel-column-width="65535*"/>
    </style:style>
    <style:style style:name="Table10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Gabriela Nerd Font" fo:font-size="14pt" officeooo:rsid="001352f6" officeooo:paragraph-rsid="001352f6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352f6" officeooo:paragraph-rsid="001352f6" style:font-size-asian="10pt" style:font-size-complex="10pt"/>
    </style:style>
    <style:style style:name="P3" style:family="paragraph" style:parent-style-name="Table_20_Contents">
      <style:text-properties officeooo:rsid="00155d59" officeooo:paragraph-rsid="00155d59"/>
    </style:style>
    <style:style style:name="P4" style:family="paragraph" style:parent-style-name="Table_20_Contents" style:list-style-name="L1">
      <style:text-properties officeooo:paragraph-rsid="00f37c65"/>
    </style:style>
    <style:style style:name="P5" style:family="paragraph" style:parent-style-name="Table_20_Contents">
      <style:text-properties officeooo:rsid="001a13da" officeooo:paragraph-rsid="001a13da"/>
    </style:style>
    <style:style style:name="P6" style:family="paragraph" style:parent-style-name="Table_20_Contents">
      <style:text-properties officeooo:paragraph-rsid="002de217"/>
    </style:style>
    <style:style style:name="P7" style:family="paragraph" style:parent-style-name="Table_20_Contents" style:list-style-name="L2">
      <style:text-properties officeooo:rsid="001cdab9" officeooo:paragraph-rsid="001cdab9"/>
    </style:style>
    <style:style style:name="P8" style:family="paragraph" style:parent-style-name="Table_20_Contents" style:list-style-name="L2">
      <style:text-properties officeooo:rsid="00c3c783" officeooo:paragraph-rsid="00c3c783"/>
    </style:style>
    <style:style style:name="P9" style:family="paragraph" style:parent-style-name="Table_20_Contents">
      <style:text-properties officeooo:rsid="00285b5d" officeooo:paragraph-rsid="00285b5d"/>
    </style:style>
    <style:style style:name="P10" style:family="paragraph" style:parent-style-name="Table_20_Contents">
      <style:text-properties officeooo:rsid="003a3704" officeooo:paragraph-rsid="003a3704"/>
    </style:style>
    <style:style style:name="P11" style:family="paragraph" style:parent-style-name="Table_20_Contents">
      <style:text-properties officeooo:paragraph-rsid="0038502b"/>
    </style:style>
    <style:style style:name="P12" style:family="paragraph" style:parent-style-name="Table_20_Contents">
      <style:text-properties officeooo:rsid="0031ed2f" officeooo:paragraph-rsid="0031ed2f"/>
    </style:style>
    <style:style style:name="P13" style:family="paragraph" style:parent-style-name="Table_20_Contents">
      <style:text-properties fo:font-style="normal" officeooo:rsid="0040fa4e" officeooo:paragraph-rsid="004613d0" style:font-style-asian="normal" style:font-style-complex="normal"/>
    </style:style>
    <style:style style:name="P14" style:family="paragraph" style:parent-style-name="Table_20_Contents">
      <style:text-properties officeooo:paragraph-rsid="005a12a0"/>
    </style:style>
    <style:style style:name="P15" style:family="paragraph" style:parent-style-name="Table_20_Contents">
      <style:text-properties officeooo:rsid="00155d59" officeooo:paragraph-rsid="0057e77c"/>
    </style:style>
    <style:style style:name="P16" style:family="paragraph" style:parent-style-name="Table_20_Contents">
      <style:text-properties officeooo:paragraph-rsid="0057e77c"/>
    </style:style>
    <style:style style:name="P17" style:family="paragraph" style:parent-style-name="Table_20_Contents">
      <style:text-properties officeooo:paragraph-rsid="006eaa5c"/>
    </style:style>
    <style:style style:name="P18" style:family="paragraph" style:parent-style-name="Table_20_Contents">
      <style:text-properties fo:font-style="normal" officeooo:rsid="006eaa5c" officeooo:paragraph-rsid="006eaa5c" style:font-style-asian="normal" style:font-style-complex="normal"/>
    </style:style>
    <style:style style:name="P19" style:family="paragraph" style:parent-style-name="Table_20_Contents">
      <style:text-properties officeooo:rsid="0056031f" officeooo:paragraph-rsid="0031ed2f"/>
    </style:style>
    <style:style style:name="P20" style:family="paragraph" style:parent-style-name="Table_20_Contents">
      <style:text-properties officeooo:rsid="00d5025a" officeooo:paragraph-rsid="00d5025a"/>
    </style:style>
    <style:style style:name="P21" style:family="paragraph" style:parent-style-name="Table_20_Contents">
      <style:text-properties fo:font-style="normal" officeooo:rsid="00d5025a" officeooo:paragraph-rsid="00d5025a" style:font-style-asian="normal" style:font-style-complex="normal"/>
    </style:style>
    <style:style style:name="P22" style:family="paragraph" style:parent-style-name="Table_20_Contents">
      <style:text-properties officeooo:paragraph-rsid="00a6af83"/>
    </style:style>
    <style:style style:name="P23" style:family="paragraph" style:parent-style-name="Table_20_Contents" style:list-style-name="L3">
      <style:text-properties officeooo:rsid="00aae126" officeooo:paragraph-rsid="00aae126"/>
    </style:style>
    <style:style style:name="P24" style:family="paragraph" style:parent-style-name="Table_20_Contents" style:list-style-name="L3">
      <style:text-properties officeooo:rsid="00abdc26" officeooo:paragraph-rsid="010a4fbc"/>
    </style:style>
    <style:style style:name="P25" style:family="paragraph" style:parent-style-name="Table_20_Contents" style:list-style-name="L3">
      <style:text-properties officeooo:rsid="00b85c70" officeooo:paragraph-rsid="010a4fbc"/>
    </style:style>
    <style:style style:name="P26" style:family="paragraph" style:parent-style-name="Table_20_Contents">
      <style:text-properties officeooo:paragraph-rsid="00440379"/>
    </style:style>
    <style:style style:name="P27" style:family="paragraph" style:parent-style-name="Table_20_Contents">
      <style:text-properties officeooo:paragraph-rsid="0042a577"/>
    </style:style>
    <style:style style:name="P28" style:family="paragraph" style:parent-style-name="Table_20_Contents">
      <style:text-properties officeooo:paragraph-rsid="01060c9c"/>
    </style:style>
    <style:style style:name="P29" style:family="paragraph" style:parent-style-name="Table_20_Contents">
      <style:text-properties officeooo:paragraph-rsid="00748bc3"/>
    </style:style>
    <style:style style:name="P30" style:family="paragraph" style:parent-style-name="Table_20_Contents">
      <style:text-properties officeooo:rsid="00155d59" officeooo:paragraph-rsid="0026808c"/>
    </style:style>
    <style:style style:name="P31" style:family="paragraph" style:parent-style-name="Table_20_Contents">
      <style:text-properties officeooo:paragraph-rsid="007e7e2d"/>
    </style:style>
    <style:style style:name="P32" style:family="paragraph" style:parent-style-name="Table_20_Contents">
      <style:text-properties fo:font-style="normal" officeooo:rsid="008c41a4" officeooo:paragraph-rsid="008c41a4" style:font-style-asian="normal" style:font-style-complex="normal"/>
    </style:style>
    <style:style style:name="P33" style:family="paragraph" style:parent-style-name="Table_20_Contents">
      <style:text-properties officeooo:paragraph-rsid="00945b29"/>
    </style:style>
    <style:style style:name="P34" style:family="paragraph" style:parent-style-name="Table_20_Contents" style:list-style-name="L4">
      <style:text-properties officeooo:rsid="01075463" officeooo:paragraph-rsid="0109805d"/>
    </style:style>
    <style:style style:name="P35" style:family="paragraph" style:parent-style-name="Table_20_Contents">
      <style:text-properties fo:font-style="normal" officeooo:rsid="0109805d" officeooo:paragraph-rsid="0109805d" style:font-style-asian="normal" style:font-style-complex="normal"/>
    </style:style>
    <style:style style:name="T1" style:family="text">
      <style:text-properties officeooo:rsid="0096d2e4"/>
    </style:style>
    <style:style style:name="T2" style:family="text">
      <style:text-properties officeooo:rsid="00eadfdf"/>
    </style:style>
    <style:style style:name="T3" style:family="text">
      <style:text-properties officeooo:rsid="0016c661"/>
    </style:style>
    <style:style style:name="T4" style:family="text">
      <style:text-properties officeooo:rsid="00176d99"/>
    </style:style>
    <style:style style:name="T5" style:family="text">
      <style:text-properties officeooo:rsid="00179046"/>
    </style:style>
    <style:style style:name="T6" style:family="text">
      <style:text-properties officeooo:rsid="00ec5562"/>
    </style:style>
    <style:style style:name="T7" style:family="text">
      <style:text-properties fo:color="#127622" loext:opacity="100%" officeooo:rsid="00ec5562"/>
    </style:style>
    <style:style style:name="T8" style:family="text">
      <style:text-properties officeooo:rsid="00edbe85"/>
    </style:style>
    <style:style style:name="T9" style:family="text">
      <style:text-properties fo:font-style="italic" officeooo:rsid="00179046" style:font-style-asian="italic" style:font-style-complex="italic"/>
    </style:style>
    <style:style style:name="T10" style:family="text">
      <style:text-properties fo:font-style="normal" officeooo:rsid="00179046" style:font-style-asian="normal" style:font-style-complex="normal"/>
    </style:style>
    <style:style style:name="T11" style:family="text">
      <style:text-properties fo:font-style="normal" officeooo:rsid="00ed2fa4" style:font-style-asian="normal" style:font-style-complex="normal"/>
    </style:style>
    <style:style style:name="T12" style:family="text">
      <style:text-properties fo:color="#127622" loext:opacity="100%" fo:font-style="normal" officeooo:rsid="00ed2fa4" style:font-style-asian="normal" style:font-style-complex="normal"/>
    </style:style>
    <style:style style:name="T13" style:family="text">
      <style:text-properties fo:color="#127622" loext:opacity="100%"/>
    </style:style>
    <style:style style:name="T14" style:family="text">
      <style:text-properties fo:background-color="#fff5ce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f2b3ea"/>
    </style:style>
    <style:style style:name="T17" style:family="text">
      <style:text-properties officeooo:rsid="00187d5c"/>
    </style:style>
    <style:style style:name="T18" style:family="text">
      <style:text-properties officeooo:rsid="0018ad12"/>
    </style:style>
    <style:style style:name="T19" style:family="text">
      <style:text-properties fo:font-style="italic" officeooo:rsid="00f2b3ea" style:font-style-asian="italic" style:font-style-complex="italic"/>
    </style:style>
    <style:style style:name="T20" style:family="text">
      <style:text-properties fo:color="#127622" loext:opacity="100%" officeooo:rsid="00ef53f2"/>
    </style:style>
    <style:style style:name="T21" style:family="text">
      <style:text-properties fo:color="#127622" loext:opacity="100%" officeooo:rsid="00f17870"/>
    </style:style>
    <style:style style:name="T22" style:family="text">
      <style:text-properties officeooo:rsid="00c10525"/>
    </style:style>
    <style:style style:name="T23" style:family="text">
      <style:text-properties officeooo:rsid="002de217"/>
    </style:style>
    <style:style style:name="T24" style:family="text">
      <style:text-properties fo:font-style="italic" officeooo:rsid="002de217" style:font-style-asian="italic" style:font-style-complex="italic"/>
    </style:style>
    <style:style style:name="T25" style:family="text">
      <style:text-properties fo:font-style="normal" officeooo:rsid="002de217" style:font-style-asian="normal" style:font-style-complex="normal"/>
    </style:style>
    <style:style style:name="T26" style:family="text">
      <style:text-properties fo:font-style="normal" officeooo:rsid="002de217" fo:background-color="#ffffd7" loext:char-shading-value="0" style:font-style-asian="normal" style:font-style-complex="normal"/>
    </style:style>
    <style:style style:name="T27" style:family="text">
      <style:text-properties fo:font-style="normal" officeooo:rsid="002edd3b" style:font-style-asian="normal" style:font-style-complex="normal"/>
    </style:style>
    <style:style style:name="T28" style:family="text">
      <style:text-properties fo:font-style="normal" officeooo:rsid="002fabf9" style:font-style-asian="normal" style:font-style-complex="normal"/>
    </style:style>
    <style:style style:name="T29" style:family="text">
      <style:text-properties fo:color="#127622" loext:opacity="100%" fo:font-style="normal" officeooo:rsid="002edd3b" style:font-style-asian="normal" style:font-style-complex="normal"/>
    </style:style>
    <style:style style:name="T30" style:family="text">
      <style:text-properties fo:color="#127622" loext:opacity="100%" fo:font-style="normal" officeooo:rsid="002fabf9" style:font-style-asian="normal" style:font-style-complex="normal"/>
    </style:style>
    <style:style style:name="T31" style:family="text">
      <style:text-properties fo:color="#127622" loext:opacity="100%" fo:font-style="normal" officeooo:rsid="00415649" style:font-style-asian="normal" style:font-style-complex="normal"/>
    </style:style>
    <style:style style:name="T32" style:family="text">
      <style:text-properties fo:color="#127622" loext:opacity="100%" fo:font-style="normal" officeooo:rsid="009868f7" style:font-style-asian="normal" style:font-style-complex="normal"/>
    </style:style>
    <style:style style:name="T33" style:family="text">
      <style:text-properties fo:font-style="normal" officeooo:rsid="002fbc45" style:font-style-asian="normal" style:font-style-complex="normal"/>
    </style:style>
    <style:style style:name="T34" style:family="text">
      <style:text-properties style:text-position="super 58%" officeooo:rsid="002e616d" fo:background-color="transparent" loext:char-shading-value="0"/>
    </style:style>
    <style:style style:name="T35" style:family="text">
      <style:text-properties style:text-position="super 58%" officeooo:rsid="00c3beec" fo:background-color="transparent" loext:char-shading-value="0"/>
    </style:style>
    <style:style style:name="T36" style:family="text">
      <style:text-properties officeooo:rsid="001eb5cf"/>
    </style:style>
    <style:style style:name="T37" style:family="text">
      <style:text-properties officeooo:rsid="00209cf5"/>
    </style:style>
    <style:style style:name="T38" style:family="text">
      <style:text-properties officeooo:rsid="00c48e94"/>
    </style:style>
    <style:style style:name="T39" style:family="text">
      <style:text-properties officeooo:rsid="00ca0d36"/>
    </style:style>
    <style:style style:name="T40" style:family="text">
      <style:text-properties officeooo:rsid="00cbde0e"/>
    </style:style>
    <style:style style:name="T41" style:family="text">
      <style:text-properties officeooo:rsid="00cb5f62"/>
    </style:style>
    <style:style style:name="T42" style:family="text">
      <style:text-properties officeooo:rsid="00caf465"/>
    </style:style>
    <style:style style:name="T43" style:family="text">
      <style:text-properties officeooo:rsid="00c49402"/>
    </style:style>
    <style:style style:name="T44" style:family="text">
      <style:text-properties officeooo:rsid="00c7a5f8"/>
    </style:style>
    <style:style style:name="T45" style:family="text">
      <style:text-properties officeooo:rsid="00c49402" fo:background-color="#ffffd7" loext:char-shading-value="0"/>
    </style:style>
    <style:style style:name="T46" style:family="text">
      <style:text-properties officeooo:rsid="00cce758"/>
    </style:style>
    <style:style style:name="T47" style:family="text">
      <style:text-properties officeooo:rsid="00c9725e"/>
    </style:style>
    <style:style style:name="T48" style:family="text">
      <style:text-properties officeooo:rsid="00ce2c4a"/>
    </style:style>
    <style:style style:name="T49" style:family="text">
      <style:text-properties officeooo:rsid="002afe57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3a3704"/>
    </style:style>
    <style:style style:name="T52" style:family="text">
      <style:text-properties fo:color="#127622" loext:opacity="100%" officeooo:rsid="003a3704"/>
    </style:style>
    <style:style style:name="T53" style:family="text">
      <style:text-properties fo:font-style="italic" officeooo:rsid="003a3704" style:font-style-asian="italic" style:font-style-complex="italic"/>
    </style:style>
    <style:style style:name="T54" style:family="text">
      <style:text-properties style:text-position="super 58%"/>
    </style:style>
    <style:style style:name="T55" style:family="text">
      <style:text-properties fo:color="#ff0000" loext:opacity="100%"/>
    </style:style>
    <style:style style:name="T56" style:family="text">
      <style:text-properties officeooo:rsid="0040f32d"/>
    </style:style>
    <style:style style:name="T57" style:family="text">
      <style:text-properties fo:font-style="italic" officeooo:rsid="004c68fc" style:font-style-asian="italic" style:font-style-complex="italic"/>
    </style:style>
    <style:style style:name="T58" style:family="text">
      <style:text-properties fo:font-style="normal" officeooo:rsid="004c68fc" style:font-style-asian="normal" style:font-style-complex="normal"/>
    </style:style>
    <style:style style:name="T59" style:family="text">
      <style:text-properties fo:font-style="normal" officeooo:rsid="004e3949" style:font-style-asian="normal" style:font-style-complex="normal"/>
    </style:style>
    <style:style style:name="T60" style:family="text">
      <style:text-properties fo:font-style="italic" officeooo:rsid="004e3949" style:font-style-asian="italic" style:font-style-complex="italic"/>
    </style:style>
    <style:style style:name="T61" style:family="text">
      <style:text-properties fo:font-style="normal" officeooo:rsid="003a3704" style:font-style-asian="normal" style:font-style-complex="normal"/>
    </style:style>
    <style:style style:name="T62" style:family="text">
      <style:text-properties officeooo:rsid="004c68fc"/>
    </style:style>
    <style:style style:name="T63" style:family="text">
      <style:text-properties officeooo:rsid="0040fa4e"/>
    </style:style>
    <style:style style:name="T64" style:family="text">
      <style:text-properties fo:color="#ff0000" loext:opacity="100%" officeooo:rsid="0040fa4e"/>
    </style:style>
    <style:style style:name="T65" style:family="text">
      <style:text-properties officeooo:rsid="006b1864"/>
    </style:style>
    <style:style style:name="T66" style:family="text">
      <style:text-properties officeooo:rsid="009c33a4"/>
    </style:style>
    <style:style style:name="T67" style:family="text">
      <style:text-properties fo:font-style="italic" officeooo:rsid="009c33a4" style:font-style-asian="italic" style:font-style-complex="italic"/>
    </style:style>
    <style:style style:name="T68" style:family="text">
      <style:text-properties officeooo:rsid="004f7069"/>
    </style:style>
    <style:style style:name="T69" style:family="text">
      <style:text-properties officeooo:rsid="004917af"/>
    </style:style>
    <style:style style:name="T70" style:family="text">
      <style:text-properties fo:color="#ff0000" loext:opacity="100%" officeooo:rsid="004917af"/>
    </style:style>
    <style:style style:name="T71" style:family="text">
      <style:text-properties fo:color="#ff0000" loext:opacity="100%" fo:font-weight="normal" officeooo:rsid="004917af" style:font-weight-asian="normal" style:font-weight-complex="normal"/>
    </style:style>
    <style:style style:name="T72" style:family="text">
      <style:text-properties fo:font-style="italic" fo:font-weight="bold" officeooo:rsid="004917af" style:font-style-asian="italic" style:font-weight-asian="bold" style:font-style-complex="italic" style:font-weight-complex="bold"/>
    </style:style>
    <style:style style:name="T73" style:family="text">
      <style:text-properties fo:font-style="normal" officeooo:rsid="004917af" style:font-style-asian="normal" style:font-style-complex="normal"/>
    </style:style>
    <style:style style:name="T74" style:family="text">
      <style:text-properties fo:font-style="normal" officeooo:rsid="00500b54" style:font-style-asian="normal" style:font-style-complex="normal"/>
    </style:style>
    <style:style style:name="T75" style:family="text">
      <style:text-properties fo:font-style="normal" officeooo:rsid="00705dc2" style:font-style-asian="normal" style:font-style-complex="normal"/>
    </style:style>
    <style:style style:name="T76" style:family="text">
      <style:text-properties fo:font-style="normal" officeooo:rsid="009eb054" style:font-style-asian="normal" style:font-style-complex="normal"/>
    </style:style>
    <style:style style:name="T77" style:family="text">
      <style:text-properties fo:font-style="normal" officeooo:rsid="00d06d7c" style:font-style-asian="normal" style:font-style-complex="normal"/>
    </style:style>
    <style:style style:name="T78" style:family="text">
      <style:text-properties officeooo:rsid="0059f40b"/>
    </style:style>
    <style:style style:name="T79" style:family="text">
      <style:text-properties fo:color="#127622" loext:opacity="100%" officeooo:rsid="0059f40b"/>
    </style:style>
    <style:style style:name="T80" style:family="text">
      <style:text-properties officeooo:rsid="005a12a0"/>
    </style:style>
    <style:style style:name="T81" style:family="text">
      <style:text-properties officeooo:rsid="00d143ab"/>
    </style:style>
    <style:style style:name="T82" style:family="text">
      <style:text-properties fo:color="#ff0000" loext:opacity="100%" officeooo:rsid="005a12a0"/>
    </style:style>
    <style:style style:name="T83" style:family="text">
      <style:text-properties officeooo:rsid="005aa579"/>
    </style:style>
    <style:style style:name="T84" style:family="text">
      <style:text-properties officeooo:rsid="00a3c5af"/>
    </style:style>
    <style:style style:name="T85" style:family="text">
      <style:text-properties style:use-window-font-color="true" loext:opacity="0%" style:text-position="super 58%"/>
    </style:style>
    <style:style style:name="T86" style:family="text">
      <style:text-properties style:use-window-font-color="true" loext:opacity="0%"/>
    </style:style>
    <style:style style:name="T87" style:family="text">
      <style:text-properties officeooo:rsid="005c5f61"/>
    </style:style>
    <style:style style:name="T88" style:family="text">
      <style:text-properties fo:color="#127622" loext:opacity="100%" officeooo:rsid="005c5f61"/>
    </style:style>
    <style:style style:name="T89" style:family="text">
      <style:text-properties officeooo:rsid="005deaed"/>
    </style:style>
    <style:style style:name="T90" style:family="text">
      <style:text-properties officeooo:rsid="00d294a3"/>
    </style:style>
    <style:style style:name="T91" style:family="text">
      <style:text-properties fo:font-style="normal" officeooo:rsid="005c5f61" style:font-style-asian="normal" style:font-style-complex="normal"/>
    </style:style>
    <style:style style:name="T92" style:family="text">
      <style:text-properties fo:font-style="normal" officeooo:rsid="00616b01" style:font-style-asian="normal" style:font-style-complex="normal"/>
    </style:style>
    <style:style style:name="T93" style:family="text">
      <style:text-properties fo:font-style="normal" officeooo:rsid="006167a8" style:font-style-asian="normal" style:font-style-complex="normal"/>
    </style:style>
    <style:style style:name="T94" style:family="text">
      <style:text-properties fo:font-style="normal" officeooo:rsid="00d294a3" style:font-style-asian="normal" style:font-style-complex="normal"/>
    </style:style>
    <style:style style:name="T95" style:family="text">
      <style:text-properties fo:font-style="normal" officeooo:rsid="005f4ca8" style:font-style-asian="normal" style:font-style-complex="normal"/>
    </style:style>
    <style:style style:name="T96" style:family="text">
      <style:text-properties fo:font-style="normal" officeooo:rsid="00709606" style:font-style-asian="normal" style:font-style-complex="normal"/>
    </style:style>
    <style:style style:name="T97" style:family="text">
      <style:text-properties fo:font-style="normal" officeooo:rsid="00712457" style:font-style-asian="normal" style:font-style-complex="normal"/>
    </style:style>
    <style:style style:name="T98" style:family="text">
      <style:text-properties fo:font-style="italic" officeooo:rsid="00709606" style:font-style-asian="italic" style:font-style-complex="italic"/>
    </style:style>
    <style:style style:name="T99" style:family="text">
      <style:text-properties fo:font-style="normal" officeooo:rsid="00d2d6db" style:font-style-asian="normal" style:font-style-complex="normal"/>
    </style:style>
    <style:style style:name="T100" style:family="text">
      <style:text-properties fo:font-style="normal" officeooo:rsid="0061446b" style:font-style-asian="normal" style:font-style-complex="normal"/>
    </style:style>
    <style:style style:name="T101" style:family="text">
      <style:text-properties fo:font-style="normal" officeooo:rsid="005db85f" style:font-style-asian="normal" style:font-style-complex="normal"/>
    </style:style>
    <style:style style:name="T102" style:family="text">
      <style:text-properties fo:font-style="normal" officeooo:rsid="00d40af0" style:font-style-asian="normal" style:font-style-complex="normal"/>
    </style:style>
    <style:style style:name="T103" style:family="text">
      <style:text-properties fo:color="#127622" loext:opacity="100%" fo:font-style="normal" officeooo:rsid="005db85f" style:font-style-asian="normal" style:font-style-complex="normal"/>
    </style:style>
    <style:style style:name="T104" style:family="text">
      <style:text-properties fo:color="#ff0000" loext:opacity="100%" fo:font-style="normal" officeooo:rsid="005db85f" style:font-style-asian="normal" style:font-style-complex="normal"/>
    </style:style>
    <style:style style:name="T105" style:family="text">
      <style:text-properties fo:color="#ff0000" loext:opacity="100%" fo:font-style="normal" officeooo:rsid="005db85f" fo:background-color="#fff5ce" loext:char-shading-value="0" style:font-style-asian="normal" style:font-style-complex="normal"/>
    </style:style>
    <style:style style:name="T106" style:family="text">
      <style:text-properties fo:font-style="italic" officeooo:rsid="005deaed" style:font-style-asian="italic" style:font-style-complex="italic"/>
    </style:style>
    <style:style style:name="T107" style:family="text">
      <style:text-properties fo:font-style="normal" officeooo:rsid="005deaed" style:font-style-asian="normal" style:font-style-complex="normal"/>
    </style:style>
    <style:style style:name="T108" style:family="text">
      <style:text-properties fo:font-style="normal" officeooo:rsid="0067959d" style:font-style-asian="normal" style:font-style-complex="normal"/>
    </style:style>
    <style:style style:name="T109" style:family="text">
      <style:text-properties fo:font-style="normal" officeooo:rsid="006aafb8" style:font-style-asian="normal" style:font-style-complex="normal"/>
    </style:style>
    <style:style style:name="T110" style:family="text">
      <style:text-properties fo:font-style="normal" officeooo:rsid="007ac0f1" style:font-style-asian="normal" style:font-style-complex="normal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0d7f13d" style:font-style-asian="normal" style:font-style-complex="normal"/>
    </style:style>
    <style:style style:name="T113" style:family="text">
      <style:text-properties fo:font-style="italic" officeooo:rsid="00d57eb2" style:font-style-asian="italic" style:font-style-complex="italic"/>
    </style:style>
    <style:style style:name="T114" style:family="text">
      <style:text-properties fo:font-style="normal" officeooo:rsid="00d57eb2" style:font-style-asian="normal" style:font-style-complex="normal"/>
    </style:style>
    <style:style style:name="T115" style:family="text">
      <style:text-properties fo:background-color="#ffdbb6" loext:char-shading-value="0"/>
    </style:style>
    <style:style style:name="T116" style:family="text">
      <style:text-properties fo:color="#800080" loext:opacity="100%"/>
    </style:style>
    <style:style style:name="T117" style:family="text">
      <style:text-properties fo:background-color="#dee6ef" loext:char-shading-value="0"/>
    </style:style>
    <style:style style:name="T118" style:family="text">
      <style:text-properties fo:font-style="italic" fo:background-color="#dee6ef" loext:char-shading-value="0" style:font-style-asian="italic" style:font-style-complex="italic"/>
    </style:style>
    <style:style style:name="T119" style:family="text">
      <style:text-properties fo:font-style="italic" officeooo:rsid="00ab68b5" fo:background-color="#dee6ef" loext:char-shading-value="0" style:font-style-asian="italic" style:font-style-complex="italic"/>
    </style:style>
    <style:style style:name="T120" style:family="text">
      <style:text-properties officeooo:rsid="00ab68b5"/>
    </style:style>
    <style:style style:name="T121" style:family="text">
      <style:text-properties fo:font-style="italic" officeooo:rsid="00ab68b5" style:font-style-asian="italic" style:font-style-complex="italic"/>
    </style:style>
    <style:style style:name="T122" style:family="text">
      <style:text-properties fo:font-style="normal" officeooo:rsid="010231a7" style:font-style-asian="normal" style:font-style-complex="normal"/>
    </style:style>
    <style:style style:name="T123" style:family="text">
      <style:text-properties fo:font-style="normal" officeooo:rsid="0102a1ff" style:font-style-asian="normal" style:font-style-complex="normal"/>
    </style:style>
    <style:style style:name="T124" style:family="text">
      <style:text-properties fo:color="#127622" loext:opacity="100%" officeooo:rsid="00748bc3"/>
    </style:style>
    <style:style style:name="T125" style:family="text">
      <style:text-properties style:text-position="super 58%" officeooo:rsid="01060c9c"/>
    </style:style>
    <style:style style:name="T126" style:family="text">
      <style:text-properties fo:background-color="#ffffd7" loext:char-shading-value="0"/>
    </style:style>
    <style:style style:name="T127" style:family="text">
      <style:text-properties style:text-position="super 58%" officeooo:rsid="00748bc3"/>
    </style:style>
    <style:style style:name="T128" style:family="text">
      <style:text-properties officeooo:rsid="00748bc3"/>
    </style:style>
    <style:style style:name="T129" style:family="text">
      <style:text-properties officeooo:rsid="007da9ad"/>
    </style:style>
    <style:style style:name="T130" style:family="text">
      <style:text-properties fo:color="#127622" loext:opacity="100%" officeooo:rsid="007da9ad"/>
    </style:style>
    <style:style style:name="T131" style:family="text">
      <style:text-properties officeooo:rsid="007e7e2d"/>
    </style:style>
    <style:style style:name="T132" style:family="text">
      <style:text-properties officeooo:rsid="0085fd7a"/>
    </style:style>
    <style:style style:name="T133" style:family="text">
      <style:text-properties fo:color="#127622" loext:opacity="100%" officeooo:rsid="0085fd7a"/>
    </style:style>
    <style:style style:name="T134" style:family="text">
      <style:text-properties officeooo:rsid="008052b2"/>
    </style:style>
    <style:style style:name="T135" style:family="text">
      <style:text-properties officeooo:rsid="0080bdda"/>
    </style:style>
    <style:style style:name="T136" style:family="text">
      <style:text-properties officeooo:rsid="00876472"/>
    </style:style>
    <style:style style:name="T137" style:family="text">
      <style:text-properties officeooo:rsid="0081bdca"/>
    </style:style>
    <style:style style:name="T138" style:family="text">
      <style:text-properties fo:font-style="italic" officeooo:rsid="0081bdca" style:font-style-asian="italic" style:font-style-complex="italic"/>
    </style:style>
    <style:style style:name="T139" style:family="text">
      <style:text-properties fo:font-style="italic" officeooo:rsid="00b087de" style:font-style-asian="italic" style:font-style-complex="italic"/>
    </style:style>
    <style:style style:name="T140" style:family="text">
      <style:text-properties fo:font-style="normal" officeooo:rsid="0081bdca" style:font-style-asian="normal" style:font-style-complex="normal"/>
    </style:style>
    <style:style style:name="T141" style:family="text">
      <style:text-properties fo:font-style="normal" officeooo:rsid="0088d6ea" style:font-style-asian="normal" style:font-style-complex="normal"/>
    </style:style>
    <style:style style:name="T142" style:family="text">
      <style:text-properties fo:font-style="normal" officeooo:rsid="00dc10d9" style:font-style-asian="normal" style:font-style-complex="normal"/>
    </style:style>
    <style:style style:name="T143" style:family="text">
      <style:text-properties fo:font-style="normal" officeooo:rsid="00dcdb10" style:font-style-asian="normal" style:font-style-complex="normal"/>
    </style:style>
    <style:style style:name="T144" style:family="text">
      <style:text-properties fo:color="#127622" loext:opacity="100%" fo:font-style="normal" officeooo:rsid="00dcdb10" style:font-style-asian="normal" style:font-style-complex="normal"/>
    </style:style>
    <style:style style:name="T145" style:family="text">
      <style:text-properties fo:font-style="normal" officeooo:rsid="010a5589" style:font-style-asian="normal" style:font-style-complex="normal"/>
    </style:style>
    <style:style style:name="T146" style:family="text">
      <style:text-properties fo:font-style="normal" officeooo:rsid="00e2f089" style:font-style-asian="normal" style:font-style-complex="normal"/>
    </style:style>
    <style:style style:name="T147" style:family="text">
      <style:text-properties fo:font-style="normal" officeooo:rsid="00e44062" style:font-style-asian="normal" style:font-style-complex="normal"/>
    </style:style>
    <style:style style:name="T148" style:family="text">
      <style:text-properties fo:color="#127622" loext:opacity="100%" fo:font-style="normal" officeooo:rsid="00e2f089" style:font-style-asian="normal" style:font-style-complex="normal"/>
    </style:style>
    <style:style style:name="T149" style:family="text">
      <style:text-properties fo:color="#ff0000" loext:opacity="100%" fo:background-color="#fff5ce" loext:char-shading-value="0"/>
    </style:style>
    <style:style style:name="T150" style:family="text">
      <style:text-properties style:text-position="super 58%" officeooo:rsid="01063ca8"/>
    </style:style>
    <style:style style:name="T151" style:family="text">
      <style:text-properties fo:color="#127622" loext:opacity="100%" fo:font-style="normal" style:font-style-asian="normal" style:font-style-complex="normal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normal" officeooo:rsid="01079650" style:font-style-asian="normal" style:font-style-complex="normal"/>
    </style:style>
    <style:style style:name="T154" style:family="text">
      <style:text-properties fo:color="#127622" loext:opacity="100%" fo:font-style="normal" officeooo:rsid="01079650" style:font-style-asian="normal" style:font-style-complex="normal"/>
    </style:style>
    <style:style style:name="T155" style:family="text">
      <style:text-properties fo:font-style="normal" officeooo:rsid="01079650" fo:background-color="#dee6ef" loext:char-shading-value="0" style:font-style-asian="normal" style:font-style-complex="normal"/>
    </style:style>
    <style:style style:name="T156" style:family="text">
      <style:text-properties style:text-position="super 58%" fo:font-style="normal" officeooo:rsid="01079650" style:font-style-asian="normal" style:font-style-complex="normal"/>
    </style:style>
    <style:style style:name="T157" style:family="text">
      <style:text-properties fo:font-style="normal" officeooo:rsid="0109805d" style:font-style-asian="normal" style:font-style-complex="normal"/>
    </style:style>
    <style:style style:name="T158" style:family="text">
      <style:text-properties fo:font-style="italic" officeooo:rsid="0109805d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ieving vs Faith</text:p>
      <text:p text:style-name="P2"><text:span text:style-name="T1">w</text:span>ha<text:span text:style-name="T2">t is</text:span> the difference?</text:p>
      <text:p text:style-name="Table_20_Contents"/>
      <text:p text:style-name="Horizontal_20_Line"/>
      <text:p text:style-name="P3">Everyone has <text:span text:style-name="T3">a rough</text:span> idea of the difference between these two words <text:span text:style-name="T4">so</text:span><text:span text:style-name="T3"> why pursue this? </text:span><text:span text:style-name="T5">Because building on our own understanding is like building on sand </text:span><text:span text:style-name="T6">(</text:span><text:span text:style-name="T7">Proverbs 3:5</text:span><text:span text:style-name="T6">) </text:span><text:span text:style-name="T5">and </text:span><text:span text:style-name="T8">the wise</text:span><text:span text:style-name="T5"> build upon </text:span><text:span text:style-name="T9">the</text:span><text:span text:style-name="T10"> Rock </text:span><text:span text:style-name="T11">(</text:span><text:span text:style-name="T12">Proverbs 3:6</text:span><text:span text:style-name="T11">)</text:span><text:span text:style-name="T10">.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3">Proverbs 4:7</text:span><text:line-break/>Wisdom is the principal thing; therefore <text:span text:style-name="T14">get wisdom</text:span>: and <text:span text:style-name="T15">with all thy getting </text:span><text:span text:style-name="T14">get understanding</text:span>.</text:p>
          </table:table-cell>
        </table:table-row>
      </table:table>
      <text:list text:style-name="L1">
        <text:list-item>
          <text:p text:style-name="P4"><text:span text:style-name="T16">W</text:span><text:span text:style-name="T17">isdom and understanding </text:span><text:span text:style-name="T18">are</text:span><text:span text:style-name="T17"> </text:span><text:span text:style-name="T16">both </text:span><text:span text:style-name="T17">obtained </text:span><text:span text:style-name="T19">only</text:span><text:span text:style-name="T16"> </text:span><text:span text:style-name="T17">from God’s word and the Holy Ghost.</text:span></text:p>
          <text:list>
            <text:list-item>
              <text:p text:style-name="P4"><text:span text:style-name="T20">Proverbs 2:6</text:span>, <text:span text:style-name="T21">1 Corinthians 3:19</text:span></text:p>
            </text:list-item>
          </text:list>
        </text:list-item>
      </text:list>
      <text:p text:style-name="P3"/>
      <text:p text:style-name="P3"/>
      <text:p text:style-name="P5">So, let’s have a look at God’s word and the Holy Ghost give you understanding.</text:p>
      <text:p text:style-name="P5"/>
      <text:p text:style-name="Horizontal_20_Line"/>
      <text:p text:style-name="P5"/>
      <text:p text:style-name="P6"><text:span text:style-name="T22">T</text:span><text:span text:style-name="T23">he word </text:span><text:span text:style-name="T24">faith</text:span><text:span text:style-name="T25"> is used three different ways in the new testament: G3640, G4102, and </text:span><text:span text:style-name="T26">G1680</text:span><text:span text:style-name="T25">. </text:span><text:span text:style-name="T27">We’re going to be looking at the </text:span><text:span text:style-name="T28">one that is</text:span><text:span text:style-name="T27"> found in </text:span><text:span text:style-name="T29">Hebrews 11:1</text:span>, <text:span text:style-name="T30">James 2:1</text:span><text:span text:style-name="T31">4-</text:span><text:span text:style-name="T30">18</text:span>, <text:span text:style-name="T32">Ephesians 2:8</text:span>, and many others <text:span text:style-name="T27">which is G4102 </text:span><text:span text:style-name="T33">(244x)</text:span><text:span text:style-name="T27">.</text:span></text:p>
      <text:p text:style-name="P3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3">Hebrews 11:1</text:span><text:line-break/>Now faith is the <text:span text:style-name="T14">substance</text:span><text:span text:style-name="T34">G4102</text:span><text:span text:style-name="T14"> of things hoped</text:span><text:span text:style-name="T35">G1679</text:span><text:span text:style-name="T14"> for</text:span>, the evidence of things not seen.</text:p>
          </table:table-cell>
        </table:table-row>
      </table:table>
      <text:list text:style-name="L2">
        <text:list-item>
          <text:p text:style-name="P7">Here <text:span text:style-name="T36">is</text:span> wisdom: a <text:span text:style-name="T37">concise</text:span> definition of what faith is: but what does that mean?</text:p>
        </text:list-item>
        <text:list-item>
          <text:p text:style-name="P8">Side note: G1679 here is “<text:span text:style-name="T38">trust” </text:span><text:span text:style-name="T39">(in the sense of expectation/</text:span><text:span text:style-name="T40">confidence</text:span><text:span text:style-name="T39"> </text:span><text:span text:style-name="T41">and </text:span><text:span text:style-name="T42">not crossing your fingers</text:span><text:span text:style-name="T39">) </text:span><text:span text:style-name="T43">and </text:span><text:span text:style-name="T44">is not connected to </text:span><text:span text:style-name="T45">G1680</text:span><text:span text:style-name="T43"> “faith” </text:span><text:span text:style-name="T46">(</text:span><text:span text:style-name="T43">which </text:span><text:span text:style-name="T47">54 times</text:span><text:span text:style-name="T43"> </text:span><text:span text:style-name="T46">is </text:span><text:span text:style-name="T48">translated</text:span><text:span text:style-name="T43"> as “hope”).</text:span></text:p>
        </text:list-item>
      </text:list>
      <text:p text:style-name="Table_20_Contents"/>
      <text:p text:style-name="Table_20_Contents"/>
      <text:p text:style-name="P9">Noah Websters 1828 dictionary defines substance as:</text:p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SUB'STANCE, n<text:span text:style-name="T49">oun</text:span>. [L. substantia, substo; sub and sto, to stand.]</text:p>
            <text:p text:style-name="Table_20_Contents"/>
            <text:p text:style-name="Table_20_Contents"><text:span text:style-name="T50">1</text:span>. In a general sense, being; something existing by itself; <text:span text:style-name="T14">that which really is or exists</text:span>; equally applicable to matter or spirit.</text:p>
            <text:p text:style-name="Table_20_Contents"/>
            <text:p text:style-name="Table_20_Contents"><text:span text:style-name="T50">2</text:span>. That which supports accidents.</text:p>
            <text:p text:style-name="Table_20_Contents">That which subsists by itself is called substance; that which subsists in and by another, is called a mode or manner of being.</text:p>
            <text:p text:style-name="Table_20_Contents"/>
            <text:p text:style-name="Table_20_Contents"><text:span text:style-name="T50">3</text:span>. The essential part; the main or <text:span text:style-name="T14">material</text:span> part.</text:p>
            <text:p text:style-name="Table_20_Contents"/>
            <text:p text:style-name="Table_20_Contents"><text:span text:style-name="T50">4</text:span>. <text:span text:style-name="T14">Something real, not imaginary</text:span>; something <text:span text:style-name="T14">solid</text:span>, not empty.</text:p>
            <text:p text:style-name="Table_20_Contents"/>
            <text:p text:style-name="Table_20_Contents"><text:span text:style-name="T50">5</text:span>. Body; corporeal nature or matter.</text:p>
          </table:table-cell>
        </table:table-row>
      </table:table>
      <text:p text:style-name="P9"/>
      <text:p text:style-name="P9"/>
      <text:p text:style-name="P9"/>
      <text:p text:style-name="Table_20_Contents"><text:soft-page-break/><text:span text:style-name="T51">In </text:span><text:span text:style-name="T52">Matthew 9</text:span><text:span text:style-name="T51"> two blind men come to Jesus asking Him to “</text:span><text:span text:style-name="T53">have mercy on us</text:span><text:span text:style-name="T51">”.</text:span></text:p>
      <text:p text:style-name="P10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13">Matthew 9:27-29</text:span><text:line-break/><text:span text:style-name="T54">27</text:span> And when Jesus departed thence, two blind men followed him, crying, and saying, <text:span text:style-name="T14">Thou Son of David, have mercy on us.</text:span></text:p>
            <text:p text:style-name="P11"><text:span text:style-name="T54">28</text:span> And when he was come into the house, the blind men came to him: and Jesus saith unto them, <text:span text:style-name="T55">Believe ye that I am able to do this?</text:span> They said unto him, Yea, Lord.</text:p>
            <text:p text:style-name="P11"><text:span text:style-name="T54">29</text:span> Then touched he their eyes, saying, <text:span text:style-name="T55">According to your faith</text:span><text:span text:style-name="T54">G4102</text:span><text:span text:style-name="T55"> be it unto you.</text:span></text:p>
          </table:table-cell>
        </table:table-row>
      </table:table>
      <text:p text:style-name="P12"/>
      <text:p text:style-name="Table_20_Contents"><text:span text:style-name="T56">The blind men </text:span><text:span text:style-name="T57">followed</text:span><text:span text:style-name="T58"> Jesus, </text:span><text:span text:style-name="T59">even </text:span><text:span text:style-name="T60">pursued</text:span><text:span text:style-name="T59"> after Him, </text:span><text:span text:style-name="T58">and </text:span><text:span text:style-name="T61">asked</text:span><text:span text:style-name="T51"> </text:span><text:span text:style-name="T62">Him </text:span><text:span text:style-name="T51">for mercy. </text:span><text:span text:style-name="T63">When Jesus asked them “</text:span><text:span text:style-name="T64">Believe ye that I am able to do this?</text:span>” <text:span text:style-name="T63">where did they </text:span><text:span text:style-name="T65">get their</text:span><text:span text:style-name="T63"> answer </text:span><text:span text:style-name="T65">from</text:span><text:span text:style-name="T63">? They </text:span><text:span text:style-name="T66">got it from something </text:span><text:span text:style-name="T67">internal</text:span>.</text:p>
      <text:p text:style-name="P13"/>
      <text:p text:style-name="Table_20_Contents"><text:span text:style-name="T68">Carefully n</text:span><text:span text:style-name="T69">otice Jesus’ response: “</text:span><text:span text:style-name="T70">According to your </text:span><text:span text:style-name="T71">faith</text:span><text:span text:style-name="T70"> be it unto you.</text:span>” <text:span text:style-name="T69">He did not say: According to your </text:span><text:span text:style-name="T72">belief</text:span><text:span text:style-name="T73"> </text:span><text:span text:style-name="T74">be it unto you</text:span><text:span text:style-name="T73">. He said: according to your </text:span><text:span text:style-name="T72">faith</text:span><text:span text:style-name="T73">. </text:span><text:span text:style-name="T75">These men were not rewarded based on what they believed: they were rewarded based on their </text:span><text:span text:style-name="T76">faith (</text:span><text:span text:style-name="T77">their </text:span><text:span text:style-name="T75">actions</text:span><text:span text:style-name="T76">)</text:span><text:span text:style-name="T75">.</text:span></text:p>
      <text:p text:style-name="P12"/>
      <text:p text:style-name="Horizontal_20_Line"/>
      <text:p text:style-name="P12"/>
      <text:p text:style-name="P14"><text:span text:style-name="T78">In </text:span><text:span text:style-name="T79">Matthew 8</text:span><text:span text:style-name="T78"> a centurion comes to Jesus </text:span><text:span text:style-name="T80">and </text:span><text:span text:style-name="T81">after recounting</text:span><text:span text:style-name="T80"> the situation He simply responds “</text:span><text:span text:style-name="T82">I will come and heal him.</text:span>” <text:span text:style-name="T83">That’s amazing by itself </text:span><text:span text:style-name="T84">but</text:span><text:span text:style-name="T83"> </text:span><text:span text:style-name="T84">what </text:span><text:span text:style-name="T83">transpires next is </text:span><text:span text:style-name="T84">also </text:span><text:span text:style-name="T83">enlightening.</text:span></text:p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13">Matthew 8:5-13</text:span><text:span text:style-name="T55"><text:line-break/></text:span><text:span text:style-name="T85">5</text:span><text:span text:style-name="T86"> And when Jesus was entered into Capernaum, there came unto him a centurion, beseeching him,</text:span></text:p>
            <text:p text:style-name="P16"><text:span text:style-name="T85">6</text:span><text:span text:style-name="T86"> And saying, Lord, my servant lieth at home sick of the palsy, grievously tormented.</text:span></text:p>
            <text:p text:style-name="P16"><text:span text:style-name="T85">7</text:span><text:span text:style-name="T86"> And Jesus saith unto him, </text:span><text:span text:style-name="T55">I will come and heal him.</text:span></text:p>
            <text:p text:style-name="P16"><text:span text:style-name="T85">8</text:span><text:span text:style-name="T86"> The centurion answered and said, Lord, I am not worthy that thou shouldest come under my roof: but speak the word only, and my servant shall be healed.</text:span></text:p>
            <text:p text:style-name="P16"><text:span text:style-name="T85">9</text:span><text:span text:style-name="T86"> For I am a man under authority, having soldiers under me: and I say to this man, Go, and he goeth; and to another, Come, and he cometh; and to my servant, Do this, and he doeth it.</text:span></text:p>
            <text:p text:style-name="P16"><text:span text:style-name="T85">10</text:span><text:span text:style-name="T86"> When Jesus heard it, he marvelled, and said to them that followed, </text:span><text:span text:style-name="T55">Verily I say unto you, I have not found so great faith</text:span><text:span text:style-name="T54">G4102</text:span><text:span text:style-name="T55">, no, not in Israel.</text:span></text:p>
            <text:p text:style-name="P16"><text:span text:style-name="T85">11</text:span><text:span text:style-name="T86"> </text:span><text:span text:style-name="T55">And I say unto you, That many shall come from the east and west, and shall sit down with Abraham, and Isaac, and Jacob, in the kingdom of heaven.</text:span></text:p>
            <text:p text:style-name="P16"><text:span text:style-name="T85">12</text:span><text:span text:style-name="T86"> </text:span><text:span text:style-name="T55">But the children of the kingdom shall be cast out into outer darkness: there shall be weeping and gnashing of teeth.</text:span></text:p>
            <text:p text:style-name="P16"><text:span text:style-name="T85">13</text:span><text:span text:style-name="T86"> And Jesus said unto the centurion, </text:span><text:span text:style-name="T55">Go thy way; and as thou hast believed, so be it done unto thee.</text:span><text:span text:style-name="T86"> And his servant was healed in the selfsame hour.</text:span></text:p>
          </table:table-cell>
        </table:table-row>
      </table:table>
      <text:p text:style-name="P15"/>
      <text:p text:style-name="P17"><text:span text:style-name="T87">In verses </text:span><text:span text:style-name="T88">8</text:span><text:span text:style-name="T87"> </text:span><text:span text:style-name="T89">&amp;</text:span><text:span text:style-name="T87"> </text:span><text:span text:style-name="T88">9</text:span><text:span text:style-name="T87"> the centurion’s </text:span><text:span text:style-name="T90">coming to Jesus and speaking </text:span><text:span text:style-name="T91">are his </text:span><text:span text:style-name="T92">internal </text:span><text:span text:style-name="T93">belief on </text:span><text:span text:style-name="T91">display </text:span><text:span text:style-name="T93">(and </text:span><text:span text:style-name="T94">immediately after </text:span><text:span text:style-name="T93">those are called faith by Jesus)</text:span><text:span text:style-name="T91">.</text:span><text:span text:style-name="T95"> </text:span><text:span text:style-name="T96">The centurion’s </text:span><text:span text:style-name="T97">internal </text:span><text:span text:style-name="T96">belief </text:span><text:span text:style-name="T98">manifests</text:span><text:span text:style-name="T96"> </text:span><text:span text:style-name="T97">as </text:span><text:span text:style-name="T99">substance in</text:span><text:span text:style-name="T97"> </text:span><text:span text:style-name="T96">his actions and his speech</text:span><text:span text:style-name="T100">.</text:span><text:span text:style-name="T91"> </text:span><text:span text:style-name="T101">We </text:span><text:span text:style-name="T102">can confirm </text:span><text:span text:style-name="T101">this because in verse </text:span><text:span text:style-name="T103">10</text:span><text:span text:style-name="T101"> Jesus says: “...</text:span><text:span text:style-name="T104">I have not </text:span><text:span text:style-name="T105">found</text:span><text:span text:style-name="T104"> so great faith</text:span>...”. <text:span text:style-name="T89">What did Jesus find and how did He find it? He </text:span><text:span text:style-name="T106">found</text:span><text:span text:style-name="T107"> it with His eyes </text:span><text:span text:style-name="T108">and ears</text:span><text:span text:style-name="T107"> </text:span><text:span text:style-name="T109">and </text:span><text:span text:style-name="T102">what He found was what the centurion just did and said.</text:span></text:p>
      <text:p text:style-name="P18"/>
      <text:p text:style-name="P19"/>
      <text:p text:style-name="P20"><text:span text:style-name="T110">T</text:span><text:span text:style-name="T111">he centurion believed and </text:span><text:span text:style-name="T112">hoped</text:span><text:span text:style-name="T111"> that Jesus could heal his servant. That led to him taking action by going to Jesus and explaining his belief – and </text:span><text:span text:style-name="T113">then</text:span><text:span text:style-name="T114"> </text:span><text:span text:style-name="T111">Jesus rewarded him.</text:span></text:p>
      <text:p text:style-name="P21"/>
      <text:p text:style-name="P21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22"><text:span text:style-name="T13">Luke 5:18-20</text:span><text:line-break/><text:span text:style-name="T54">18</text:span> And, behold, <text:span text:style-name="T14">men</text:span> <text:span text:style-name="T115">brought</text:span> in a bed a man which was taken with a palsy: and <text:span text:style-name="T14">they</text:span> <text:span text:style-name="T115">sought</text:span> means to <text:span text:style-name="T115">bring</text:span> him in, and to <text:span text:style-name="T15">lay</text:span> him before him.</text:p>
            <text:p text:style-name="P22"><text:span text:style-name="T54">19</text:span> And when <text:span text:style-name="T14">they</text:span> could not find by what way <text:span text:style-name="T14">they</text:span> might <text:span text:style-name="T115">bring</text:span> him in because of the multitude, <text:span text:style-name="T14">they</text:span> <text:span text:style-name="T115">went</text:span> upon the housetop, and let him down through the tiling with his couch into the midst before <text:span text:style-name="T116">Jesus</text:span>.</text:p>
            <text:p text:style-name="P22"><text:span text:style-name="T54">20</text:span> And when <text:span text:style-name="T116">he</text:span> <text:span text:style-name="T117">saw</text:span> <text:span text:style-name="T14">their</text:span> <text:span text:style-name="T115">faith</text:span><text:span text:style-name="T54">G4102</text:span>, <text:span text:style-name="T116">he</text:span> said unto him, <text:span text:style-name="T55">Man, thy sins are forgiven thee.</text:span></text:p>
          </table:table-cell>
        </table:table-row>
      </table:table>
      <text:list text:style-name="L3">
        <text:list-item>
          <text:p text:style-name="P23">What did Jesus <text:span text:style-name="T118">se</text:span><text:span text:style-name="T119">e</text:span><text:span text:style-name="T120"> with His eyes? </text:span><text:span text:style-name="T121">Their faith</text:span><text:span text:style-name="T120">.</text:span></text:p>
          <text:list>
            <text:list-item>
              <text:p text:style-name="P24">The men carrying the man taken with a palsy.</text:p>
            </text:list-item>
            <text:list-item>
              <text:p text:style-name="P25"><text:span text:style-name="T111">They </text:span><text:span text:style-name="T122">came to Jesus and </text:span><text:span text:style-name="T123">found</text:span><text:span text:style-name="T111"> a way to get their friend right in front of Jesus.</text:span></text:p>
            </text:list-item>
          </text:list>
        </text:list-item>
      </text:list>
      <text:p text:style-name="Horizontal_20_Line"/>
      <table:table table:name="Table6" table:style-name="Table6">
        <table:table-column table:style-name="Table6.A"/>
        <table:table-row>
          <table:table-cell table:style-name="Table6.A1" office:value-type="string">
            <text:p text:style-name="P26"><text:span text:style-name="T13">James 2:14-1</text:span><text:span text:style-name="T124">9</text:span><text:line-break/><text:span text:style-name="T54">14</text:span> What doth it <text:span text:style-name="T14">profit</text:span>, my brethren, though a man say he hath faith<text:span text:style-name="T125">G4102</text:span>, and have not works? can faith save him?</text:p>
            <text:p text:style-name="P26"><text:span text:style-name="T54">15</text:span> <text:span text:style-name="T126">If a brother or sister be naked, and destitute of daily food,</text:span></text:p>
            <text:p text:style-name="P27"><text:span text:style-name="T54">16</text:span> <text:span text:style-name="T126">And one of you say unto them, Depart in peace, be ye warmed and filled; notwithstanding ye give them not those things which are needful to the body; what doth it </text:span><text:span text:style-name="T14">profit</text:span><text:span text:style-name="T126">?</text:span></text:p>
            <text:p text:style-name="P27"><text:span text:style-name="T54">17</text:span> Even so faith<text:span text:style-name="T125">G4102</text:span>, if it hath not works, is <text:span text:style-name="T14">dead</text:span>, being alone. </text:p>
            <text:p text:style-name="P28"><text:span text:style-name="T54">18</text:span> Yea, a man may say, Thou hast faith<text:span text:style-name="T125">G4102</text:span>, and I have works: shew me thy faith<text:span text:style-name="T125">G4102</text:span> without thy works, and <text:span text:style-name="T117">I will shew thee</text:span> my faith<text:span text:style-name="T125">G4102</text:span> by <text:span text:style-name="T117">my works</text:span>.</text:p>
            <text:p text:style-name="P29"><text:span text:style-name="T127">19</text:span><text:span text:style-name="T128"> </text:span>Thou believest that there is one God; thou doest well: <text:span text:style-name="T14">the devils also believe</text:span>, and tremble.</text:p>
          </table:table-cell>
        </table:table-row>
      </table:table>
      <text:p text:style-name="P30"/>
      <text:p text:style-name="P31"><text:span text:style-name="T129">In </text:span><text:span text:style-name="T130">James 2</text:span><text:span text:style-name="T129"> we’re given an example of faith without works: </text:span><text:span text:style-name="T131">and the obvious answer to the </text:span><text:span text:style-name="T132">question at the end of verse </text:span><text:span text:style-name="T133">16</text:span><text:span text:style-name="T131"> is that there is no profit </text:span><text:span text:style-name="T134">both for the man or the brother or sister that hath </text:span><text:span text:style-name="T135">a </text:span><text:span text:style-name="T134">need. </text:span><text:span text:style-name="T136">And so we learn that f</text:span><text:span text:style-name="T137">aith without </text:span><text:span text:style-name="T138">substance/</text:span><text:span text:style-name="T139">works/action</text:span><text:span text:style-name="T138"> </text:span><text:span text:style-name="T140">is </text:span><text:span text:style-name="T141">dead</text:span><text:span text:style-name="T140">. </text:span><text:span text:style-name="T142">It has no life in it </text:span><text:span text:style-name="T143">(</text:span><text:span text:style-name="T144">John 14:6</text:span><text:span text:style-name="T143">). </text:span><text:span text:style-name="T145">That means it’s dead: t</text:span><text:span text:style-name="T146">here is </text:span><text:span text:style-name="T147">nothing dead</text:span><text:span text:style-name="T146"> in the kingdom of God: </text:span><text:span text:style-name="T148">Revelation 21:4</text:span><text:span text:style-name="T146">.</text:span></text:p>
      <text:p text:style-name="P32"/>
      <table:table table:name="Table8" table:style-name="Table8">
        <table:table-column table:style-name="Table8.A"/>
        <table:table-row>
          <table:table-cell table:style-name="Table8.A1" office:value-type="string">
            <text:p text:style-name="P33"><text:span text:style-name="T13">Matthew 7:24-27</text:span><text:line-break/><text:span text:style-name="T54">24</text:span> <text:span text:style-name="T55">Therefore whosoever heareth these sayings of mine, and </text:span><text:span text:style-name="T149">doeth</text:span><text:span text:style-name="T55"> them, I will liken him unto a wise man, which </text:span><text:span text:style-name="T149">built</text:span><text:span text:style-name="T55"> his house upon a rock:</text:span></text:p>
            <text:p text:style-name="P33"><text:span text:style-name="T54">25</text:span> <text:span text:style-name="T55">And the rain descended, and the floods came, and the winds blew, and beat upon that house; and it fell not: for it was </text:span><text:span text:style-name="T149">founded</text:span><text:span text:style-name="T55"> upon a rock.</text:span></text:p>
            <text:p text:style-name="P33"><text:span text:style-name="T54">26</text:span> <text:span text:style-name="T55">And every one that heareth these sayings of mine, and </text:span><text:span text:style-name="T149">doeth</text:span><text:span text:style-name="T55"> them not, shall be likened unto a foolish man, which </text:span><text:span text:style-name="T149">built</text:span><text:span text:style-name="T55"> his house upon the sand:</text:span></text:p>
            <text:p text:style-name="P33"><text:span text:style-name="T54">27</text:span> <text:span text:style-name="T55">And the rain descended, and the floods came, and the winds blew, and beat upon that house; and it fell: and great was the fall of it.</text:span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3">Hebrews 11:6</text:span><text:line-break/>But without faith<text:span text:style-name="T150">G4102</text:span> it is impossible to please him: for he that cometh to God must believe that he is, and that he is a rewarder of them that diligently seek him.</text:p>
          </table:table-cell>
        </table:table-row>
      </table:table>
      <text:list text:style-name="L4">
        <text:list-item>
          <text:p text:style-name="P34">Take a wild guess which usage of faith it takes to please God:<text:span text:style-name="T111"> the same word G4102 is translated in </text:span><text:span text:style-name="T151">Hebrews 11:1</text:span><text:span text:style-name="T111"> as </text:span><text:span text:style-name="T152">substance</text:span><text:span text:style-name="T111">. </text:span><text:span text:style-name="T153">In </text:span><text:span text:style-name="T154">Titus 2:10</text:span><text:span text:style-name="T153"> it is translated as “</text:span><text:span text:style-name="T155">shewing</text:span><text:span text:style-name="T153"> all good fidelity</text:span><text:span text:style-name="T156">G4102</text:span><text:span text:style-name="T153">”.</text:span></text:p>
        </text:list-item>
        <text:list-item>
          <text:p text:style-name="P34"><text:span text:style-name="T157">Jesus rewarded the blind men, the centurion, and the man taken with a palsy based on what he </text:span><text:span text:style-name="T158">saw</text:span><text:span text:style-name="T157"> them do – their actions.</text:span></text:p>
        </text:list-item>
      </text:list>
      <text:p text:style-name="P35"/>
      <text:p text:style-name="P3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pan text:style-name="T13">Matthew 16:27</text:span><text:line-break/><text:span text:style-name="T55">For the Son of man shall come in the glory of his Father with his angels; and then </text:span><text:span text:style-name="T149">he shall reward every man according to his works</text:span><text:span text:style-name="T55">.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>
      <style:paragraph-properties fo:margin-top="0.0799in" fo:margin-bottom="0.0799in" style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07:31:22.699694300</meta:creation-date>
    <dc:title>default</dc:title>
    <meta:editing-duration>PT4H9M38S</meta:editing-duration>
    <meta:editing-cycles>251</meta:editing-cycles>
    <meta:generator>LibreOffice/26.2.4.2$Linux_X86_64 LibreOffice_project/64a984c51f4702dbd3710b13428c673a2f1292e7</meta:generator>
    <meta:initial-creator>William K. McDannell Jr.</meta:initial-creator>
    <dc:date>2026-07-11T12:19:58.261183432</dc:date>
    <meta:document-statistic meta:table-count="10" meta:image-count="0" meta:object-count="0" meta:page-count="3" meta:paragraph-count="58" meta:word-count="1415" meta:character-count="7539" meta:non-whitespace-character-count="6188"/>
    <meta:template xlink:type="simple" xlink:actuate="onRequest" xlink:title="default" xlink:href="../../../../AppData/Roaming/LibreOffice/4/user/template/default.ott" meta:date="2025-10-13T07:31:21.707717900"/>
  </office:meta>
</office:document-meta>
</file>