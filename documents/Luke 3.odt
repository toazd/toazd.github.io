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944in" fo:break-before="page" table:align="left" style:may-break-between-rows="true" table:border-model="collapsing"/>
    </style:style>
    <style:style style:name="Table1.A" style:family="table-column">
      <style:table-column-properties style:column-width="3.816in"/>
    </style:style>
    <style:style style:name="Table1.B" style:family="table-column">
      <style:table-column-properties style:column-width="0.1201in"/>
    </style:style>
    <style:style style:name="Table1.C" style:family="table-column">
      <style:table-column-properties style:column-width="3.95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127622" loext:opacity="100%" style:font-name="Liberation Sans" fo:font-size="10.5pt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.5pt" officeooo:rsid="000de216" officeooo:paragraph-rsid="000de216" style:font-size-asian="10.5pt" style:font-size-complex="10.5pt"/>
    </style:style>
    <style:style style:name="P4" style:family="paragraph" style:parent-style-name="Table_20_Contents" style:list-style-name="L1">
      <style:text-properties style:font-name="Liberation Sans" fo:font-size="10.5pt" style:font-size-asian="10.5pt" style:font-size-complex="10.5pt"/>
    </style:style>
    <style:style style:name="P5" style:family="paragraph" style:parent-style-name="Table_20_Contents">
      <style:text-properties style:font-name="Liberation Sans" fo:font-size="10.5pt" style:font-size-asian="10.5pt" style:font-size-complex="10.5pt"/>
    </style:style>
    <style:style style:name="P6" style:family="paragraph" style:parent-style-name="Table_20_Contents" style:list-style-name="L2">
      <style:text-properties style:font-name="Liberation Sans" fo:font-size="10.5pt" style:font-size-asian="10.5pt" style:font-size-complex="10.5pt"/>
    </style:style>
    <style:style style:name="P7" style:family="paragraph" style:parent-style-name="Standard">
      <style:text-properties style:font-name="Liberation Sans" fo:font-size="11pt" officeooo:paragraph-rsid="00059761" style:font-size-asian="11pt" style:font-size-complex="11pt"/>
    </style:style>
    <style:style style:name="T1" style:family="text">
      <style:text-properties fo:color="#127622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Luke 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Luke 3</text:span> from Abraham</text:p>
          </table:table-cell>
        </table:table-row>
        <table:table-row table:style-name="Table1.1">
          <table:table-cell table:style-name="Table1.A2" office:value-type="string">
            <text:list text:style-name="L1">
              <text:list-item>
                <text:p text:style-name="P4">God</text:p>
              </text:list-item>
              <text:list-item>
                <text:p text:style-name="P4">Adam</text:p>
              </text:list-item>
              <text:list-item>
                <text:p text:style-name="P4">Seth</text:p>
              </text:list-item>
              <text:list-item>
                <text:p text:style-name="P4">Enos</text:p>
              </text:list-item>
              <text:list-item>
                <text:p text:style-name="P4">Cainan</text:p>
              </text:list-item>
              <text:list-item>
                <text:p text:style-name="P4">Maleleel / Mahalaleel</text:p>
              </text:list-item>
              <text:list-item>
                <text:p text:style-name="P4">Jared</text:p>
              </text:list-item>
              <text:list-item>
                <text:p text:style-name="P4">Enoch</text:p>
              </text:list-item>
              <text:list-item>
                <text:p text:style-name="P4">Mathusala / Methuselah</text:p>
              </text:list-item>
              <text:list-item>
                <text:p text:style-name="P4">Lamech</text:p>
              </text:list-item>
              <text:list-item>
                <text:p text:style-name="P4">Noe / Noah</text:p>
              </text:list-item>
              <text:list-item>
                <text:p text:style-name="P4">Sem / Shem</text:p>
              </text:list-item>
              <text:list-item>
                <text:p text:style-name="P4">Arphaxad</text:p>
              </text:list-item>
              <text:list-item>
                <text:p text:style-name="P4">Cainan</text:p>
              </text:list-item>
              <text:list-item>
                <text:p text:style-name="P4">Sala / Salah / Shelah</text:p>
              </text:list-item>
              <text:list-item>
                <text:p text:style-name="P4">Heber / Eber</text:p>
              </text:list-item>
              <text:list-item>
                <text:p text:style-name="P4">Phalec / Peleg</text:p>
              </text:list-item>
              <text:list-item>
                <text:p text:style-name="P4">Ragau / Reu</text:p>
              </text:list-item>
              <text:list-item>
                <text:p text:style-name="P4">Saruch / Serug</text:p>
              </text:list-item>
              <text:list-item>
                <text:p text:style-name="P4">Nachor / Nahor</text:p>
              </text:list-item>
              <text:list-item>
                <text:p text:style-name="P4">Thara / Terah</text:p>
              </text:list-item>
              <text:list-item>
                <text:p text:style-name="P4">Abraham / Abram</text:p>
              </text:list-item>
              <text:list-item>
                <text:p text:style-name="P4">Isaac</text:p>
              </text:list-item>
              <text:list-item>
                <text:p text:style-name="P4">Jacob</text:p>
              </text:list-item>
              <text:list-item>
                <text:p text:style-name="P4">Juda / Judah</text:p>
              </text:list-item>
              <text:list-item>
                <text:p text:style-name="P4">Phares / Pharez</text:p>
              </text:list-item>
              <text:list-item>
                <text:p text:style-name="P4">Esrom / Hezron</text:p>
              </text:list-item>
              <text:list-item>
                <text:p text:style-name="P4">Aram / Ram</text:p>
              </text:list-item>
              <text:list-item>
                <text:p text:style-name="P4">Aminadab / Amminadab</text:p>
              </text:list-item>
              <text:list-item>
                <text:p text:style-name="P4">Naasson / Nahshon</text:p>
              </text:list-item>
              <text:list-item>
                <text:p text:style-name="P4">Salman / Salmon</text:p>
              </text:list-item>
              <text:list-item>
                <text:p text:style-name="P4">Booz / Boaz</text:p>
              </text:list-item>
              <text:list-item>
                <text:p text:style-name="P4">Obed</text:p>
              </text:list-item>
              <text:list-item>
                <text:p text:style-name="P4">Jesse</text:p>
              </text:list-item>
              <text:list-item>
                <text:p text:style-name="P4">David</text:p>
              </text:list-item>
              <text:list-item>
                <text:p text:style-name="P4">Nathan</text:p>
              </text:list-item>
              <text:list-item>
                <text:p text:style-name="P4">Mattatha</text:p>
              </text:list-item>
              <text:list-item>
                <text:p text:style-name="P4">Menan</text:p>
              </text:list-item>
              <text:list-item>
                <text:p text:style-name="P4">Melea</text:p>
              </text:list-item>
              <text:list-item>
                <text:p text:style-name="P4">Eliakim</text:p>
              </text:list-item>
              <text:list-item>
                <text:p text:style-name="P4">Jonan</text:p>
              </text:list-item>
              <text:list-item>
                <text:p text:style-name="P4">Joseph</text:p>
              </text:list-item>
              <text:list-item>
                <text:p text:style-name="P4">Juda</text:p>
              </text:list-item>
              <text:list-item>
                <text:p text:style-name="P4">Simeon</text:p>
              </text:list-item>
              <text:list-item>
                <text:p text:style-name="P4">Levi</text:p>
              </text:list-item>
              <text:list-item>
                <text:p text:style-name="P4">Matthat</text:p>
              </text:list-item>
              <text:list-item>
                <text:p text:style-name="P4">Jorim</text:p>
              </text:list-item>
              <text:list-item>
                <text:p text:style-name="P4">Eliezer</text:p>
              </text:list-item>
              <text:list-item>
                <text:p text:style-name="P4">Jose</text:p>
              </text:list-item>
              <text:list-item>
                <text:p text:style-name="P4">Er</text:p>
              </text:list-item>
              <text:list-item>
                <text:p text:style-name="P4">Elmodam</text:p>
              </text:list-item>
              <text:list-item>
                <text:p text:style-name="P4">Cosam</text:p>
              </text:list-item>
              <text:list-item>
                <text:p text:style-name="P4">Addi</text:p>
              </text:list-item>
              <text:list-item>
                <text:p text:style-name="P4">Melchi</text:p>
              </text:list-item>
              <text:list-item>
                <text:p text:style-name="P4">Neri</text:p>
              </text:list-item>
              <text:list-item>
                <text:p text:style-name="P4">Salathiel</text:p>
              </text:list-item>
              <text:list-item>
                <text:p text:style-name="P4">Zorobabel</text:p>
              </text:list-item>
              <text:list-item>
                <text:p text:style-name="P4">Rhesa</text:p>
              </text:list-item>
              <text:list-item>
                <text:p text:style-name="P4">Joanna</text:p>
              </text:list-item>
              <text:list-item>
                <text:p text:style-name="P4">Juda</text:p>
              </text:list-item>
              <text:list-item>
                <text:p text:style-name="P4">Joseph</text:p>
              </text:list-item>
              <text:list-item>
                <text:p text:style-name="P4">Semei</text:p>
              </text:list-item>
              <text:list-item>
                <text:p text:style-name="P4">Mattathias</text:p>
              </text:list-item>
              <text:list-item>
                <text:p text:style-name="P4">Maath</text:p>
              </text:list-item>
              <text:list-item>
                <text:p text:style-name="P4">Nagge</text:p>
              </text:list-item>
              <text:list-item>
                <text:p text:style-name="P4">Esli</text:p>
              </text:list-item>
              <text:list-item>
                <text:p text:style-name="P4">Naum</text:p>
              </text:list-item>
              <text:list-item>
                <text:p text:style-name="P4">Amos</text:p>
              </text:list-item>
              <text:list-item>
                <text:p text:style-name="P4">Mattathias</text:p>
              </text:list-item>
              <text:list-item>
                <text:p text:style-name="P4">Joseph</text:p>
              </text:list-item>
              <text:list-item>
                <text:p text:style-name="P4">Janna</text:p>
              </text:list-item>
              <text:list-item>
                <text:p text:style-name="P4">Melchi</text:p>
              </text:list-item>
              <text:list-item>
                <text:p text:style-name="P4">Levi</text:p>
              </text:list-item>
              <text:list-item>
                <text:p text:style-name="P4">Matthat</text:p>
              </text:list-item>
              <text:list-item>
                <text:p text:style-name="P4">Heli</text:p>
              </text:list-item>
              <text:list-item>
                <text:p text:style-name="P4">Joseph</text:p>
              </text:list-item>
              <text:list-item>
                <text:p text:style-name="P4">Jesus</text:p>
              </text:list-item>
            </text:list>
          </table:table-cell>
          <table:table-cell table:style-name="Table1.B2">
            <text:p text:style-name="P5"/>
          </table:table-cell>
          <table:table-cell table:style-name="Table1.A2" office:value-type="string">
            <text:list text:style-name="L2">
              <text:list-item>
                <text:p text:style-name="P6">Abraham / Abram</text:p>
              </text:list-item>
              <text:list-item>
                <text:p text:style-name="P6">Isaac</text:p>
              </text:list-item>
              <text:list-item>
                <text:p text:style-name="P6">Jacob</text:p>
              </text:list-item>
              <text:list-item>
                <text:p text:style-name="P6">Juda / Judah</text:p>
              </text:list-item>
              <text:list-item>
                <text:p text:style-name="P6">Phares / Pharez</text:p>
              </text:list-item>
              <text:list-item>
                <text:p text:style-name="P6">Esrom / Hezron</text:p>
              </text:list-item>
              <text:list-item>
                <text:p text:style-name="P6">Aram / Ram</text:p>
              </text:list-item>
              <text:list-item>
                <text:p text:style-name="P6">Aminadab / Amminadab</text:p>
              </text:list-item>
              <text:list-item>
                <text:p text:style-name="P6">Naasson / Nahshon</text:p>
              </text:list-item>
              <text:list-item>
                <text:p text:style-name="P6">Salman / Salmon</text:p>
              </text:list-item>
              <text:list-item>
                <text:p text:style-name="P6">Booz / Boa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6">David</text:p>
              </text:list-item>
              <text:list-item>
                <text:p text:style-name="P6">Nathan</text:p>
              </text:list-item>
              <text:list-item>
                <text:p text:style-name="P6">Mattatha</text:p>
              </text:list-item>
              <text:list-item>
                <text:p text:style-name="P6">Menan</text:p>
              </text:list-item>
              <text:list-item>
                <text:p text:style-name="P6">Melea</text:p>
              </text:list-item>
              <text:list-item>
                <text:p text:style-name="P6">Eliakim</text:p>
              </text:list-item>
              <text:list-item>
                <text:p text:style-name="P6">Jonan</text:p>
              </text:list-item>
              <text:list-item>
                <text:p text:style-name="P6">Joseph</text:p>
              </text:list-item>
              <text:list-item>
                <text:p text:style-name="P6">Juda</text:p>
              </text:list-item>
              <text:list-item>
                <text:p text:style-name="P6">Simeon</text:p>
              </text:list-item>
              <text:list-item>
                <text:p text:style-name="P6">Levi</text:p>
              </text:list-item>
              <text:list-item>
                <text:p text:style-name="P6">Matthat</text:p>
              </text:list-item>
              <text:list-item>
                <text:p text:style-name="P6">Jorim</text:p>
              </text:list-item>
              <text:list-item>
                <text:p text:style-name="P6">Eliezer</text:p>
              </text:list-item>
              <text:list-item>
                <text:p text:style-name="P6">Jose</text:p>
              </text:list-item>
              <text:list-item>
                <text:p text:style-name="P6">Er</text:p>
              </text:list-item>
              <text:list-item>
                <text:p text:style-name="P6">Elmodam</text:p>
              </text:list-item>
              <text:list-item>
                <text:p text:style-name="P6">Cosam</text:p>
              </text:list-item>
              <text:list-item>
                <text:p text:style-name="P6">Addi</text:p>
              </text:list-item>
              <text:list-item>
                <text:p text:style-name="P6">Melchi</text:p>
              </text:list-item>
              <text:list-item>
                <text:p text:style-name="P6">Neri</text:p>
              </text:list-item>
              <text:list-item>
                <text:p text:style-name="P6">Salathiel</text:p>
              </text:list-item>
              <text:list-item>
                <text:p text:style-name="P6">Zorobabel</text:p>
              </text:list-item>
              <text:list-item>
                <text:p text:style-name="P6">Rhesa</text:p>
              </text:list-item>
              <text:list-item>
                <text:p text:style-name="P6">Joanna</text:p>
              </text:list-item>
              <text:list-item>
                <text:p text:style-name="P6">Juda</text:p>
              </text:list-item>
              <text:list-item>
                <text:p text:style-name="P6">Joseph</text:p>
              </text:list-item>
              <text:list-item>
                <text:p text:style-name="P6">Semei</text:p>
              </text:list-item>
              <text:list-item>
                <text:p text:style-name="P6">Mattathias</text:p>
              </text:list-item>
              <text:list-item>
                <text:p text:style-name="P6">Maath</text:p>
              </text:list-item>
              <text:list-item>
                <text:p text:style-name="P6">Nagge</text:p>
              </text:list-item>
              <text:list-item>
                <text:p text:style-name="P6">Esli</text:p>
              </text:list-item>
              <text:list-item>
                <text:p text:style-name="P6">Naum</text:p>
              </text:list-item>
              <text:list-item>
                <text:p text:style-name="P6">Amos</text:p>
              </text:list-item>
              <text:list-item>
                <text:p text:style-name="P6">Mattathias</text:p>
              </text:list-item>
              <text:list-item>
                <text:p text:style-name="P6">Joseph</text:p>
              </text:list-item>
              <text:list-item>
                <text:p text:style-name="P6">Janna</text:p>
              </text:list-item>
              <text:list-item>
                <text:p text:style-name="P6">Melchi</text:p>
              </text:list-item>
              <text:list-item>
                <text:p text:style-name="P6">Levi</text:p>
              </text:list-item>
              <text:list-item>
                <text:p text:style-name="P6">Matthat</text:p>
              </text:list-item>
              <text:list-item>
                <text:p text:style-name="P6">Heli</text:p>
              </text:list-item>
              <text:list-item>
                <text:p text:style-name="P6">Joseph</text:p>
              </text:list-item>
              <text:list-item>
                <text:p text:style-name="P6">Jesus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12:54:08.932538197</meta:creation-date>
    <meta:generator>LibreOffice/26.2.4.2$Linux_X86_64 LibreOffice_project/64a984c51f4702dbd3710b13428c673a2f1292e7</meta:generator>
    <dc:title>Luke 3</dc:title>
    <meta:editing-duration>PT11M42S</meta:editing-duration>
    <meta:editing-cycles>16</meta:editing-cycles>
    <dc:date>2026-07-11T12:30:26.490194340</dc:date>
    <meta:document-statistic meta:table-count="1" meta:image-count="0" meta:object-count="0" meta:page-count="1" meta:paragraph-count="135" meta:word-count="332" meta:character-count="1397" meta:non-whitespace-character-count="1333"/>
    <meta:template xlink:type="simple" xlink:actuate="onRequest" xlink:title="default" xlink:href="../../../../Templates/default.ott" meta:date="2025-06-30T12:54:08.609742763"/>
  </office:meta>
</office:document-meta>
</file>