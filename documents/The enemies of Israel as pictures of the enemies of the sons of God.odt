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4ca06" officeooo:paragraph-rsid="0024ca06"/>
    </style:style>
    <style:style style:name="P2" style:family="paragraph" style:parent-style-name="Table_20_Contents">
      <style:text-properties officeooo:rsid="001d6bd3" officeooo:paragraph-rsid="001d6bd3"/>
    </style:style>
    <style:style style:name="P3" style:family="paragraph" style:parent-style-name="Table_20_Contents" style:list-style-name="L1">
      <style:text-properties officeooo:rsid="001d6bd3" officeooo:paragraph-rsid="001f103c"/>
    </style:style>
    <style:style style:name="P4" style:family="paragraph" style:parent-style-name="Table_20_Contents" style:list-style-name="L1">
      <style:text-properties officeooo:rsid="00294932" officeooo:paragraph-rsid="00294932"/>
    </style:style>
    <style:style style:name="P5" style:family="paragraph" style:parent-style-name="Table_20_Contents" style:list-style-name="L1">
      <style:text-properties officeooo:rsid="001f9a67" officeooo:paragraph-rsid="00294932"/>
    </style:style>
    <style:style style:name="P6" style:family="paragraph" style:parent-style-name="Table_20_Contents" style:list-style-name="L1">
      <style:text-properties officeooo:rsid="001ffc29" officeooo:paragraph-rsid="00294932"/>
    </style:style>
    <style:style style:name="P7" style:family="paragraph" style:parent-style-name="Table_20_Contents" style:list-style-name="L1">
      <style:text-properties officeooo:rsid="00217245" officeooo:paragraph-rsid="00217245"/>
    </style:style>
    <style:style style:name="P8" style:family="paragraph" style:parent-style-name="Table_20_Contents" style:list-style-name="L1">
      <style:text-properties officeooo:rsid="00226f5d" officeooo:paragraph-rsid="00226f5d"/>
    </style:style>
    <style:style style:name="P9" style:family="paragraph" style:parent-style-name="Table_20_Contents" style:list-style-name="L1">
      <style:text-properties officeooo:rsid="0056272d" officeooo:paragraph-rsid="0056272d"/>
    </style:style>
    <style:style style:name="P10" style:family="paragraph" style:parent-style-name="Table_20_Contents" style:list-style-name="L1">
      <style:text-properties officeooo:rsid="001ffc29" officeooo:paragraph-rsid="001ffc29"/>
    </style:style>
    <style:style style:name="P11" style:family="paragraph" style:parent-style-name="Table_20_Contents" style:list-style-name="L1">
      <style:text-properties officeooo:rsid="001f9a67" officeooo:paragraph-rsid="001f9a67"/>
    </style:style>
    <style:style style:name="P12" style:family="paragraph" style:parent-style-name="Table_20_Contents" style:list-style-name="L1">
      <style:text-properties officeooo:rsid="002464f7" officeooo:paragraph-rsid="002464f7"/>
    </style:style>
    <style:style style:name="P13" style:family="paragraph" style:parent-style-name="Table_20_Contents">
      <style:text-properties officeooo:rsid="00354688" officeooo:paragraph-rsid="00354688"/>
    </style:style>
    <style:style style:name="P14" style:family="paragraph" style:parent-style-name="Table_20_Contents" style:list-style-name="L2">
      <style:text-properties officeooo:rsid="00354688" officeooo:paragraph-rsid="00354688"/>
    </style:style>
    <style:style style:name="P15" style:family="paragraph" style:parent-style-name="Table_20_Contents" style:list-style-name="L2">
      <style:text-properties officeooo:rsid="0035f19e" officeooo:paragraph-rsid="0035f19e"/>
    </style:style>
    <style:style style:name="P16" style:family="paragraph" style:parent-style-name="Table_20_Contents" style:list-style-name="L2">
      <style:text-properties officeooo:rsid="003b26a8" officeooo:paragraph-rsid="003b26a8"/>
    </style:style>
    <style:style style:name="P17" style:family="paragraph" style:parent-style-name="Table_20_Contents" style:list-style-name="L2">
      <style:text-properties officeooo:rsid="0037b5e7" officeooo:paragraph-rsid="0037b5e7"/>
    </style:style>
    <style:style style:name="P18" style:family="paragraph" style:parent-style-name="Table_20_Contents" style:list-style-name="L2">
      <style:text-properties officeooo:rsid="0038b095" officeooo:paragraph-rsid="0038b095"/>
    </style:style>
    <style:style style:name="P19" style:family="paragraph" style:parent-style-name="Table_20_Contents" style:list-style-name="L2">
      <style:text-properties officeooo:rsid="003a0a5d" officeooo:paragraph-rsid="003a0a5d"/>
    </style:style>
    <style:style style:name="P20" style:family="paragraph" style:parent-style-name="Table_20_Contents" style:list-style-name="L2">
      <style:text-properties officeooo:rsid="003b47e9" officeooo:paragraph-rsid="003b47e9"/>
    </style:style>
    <style:style style:name="P21" style:family="paragraph" style:parent-style-name="Table_20_Contents" style:list-style-name="L2">
      <style:text-properties officeooo:rsid="003bcec7" officeooo:paragraph-rsid="003bcec7"/>
    </style:style>
    <style:style style:name="P22" style:family="paragraph" style:parent-style-name="Table_20_Contents">
      <style:text-properties officeooo:rsid="003db3d0" officeooo:paragraph-rsid="003db3d0"/>
    </style:style>
    <style:style style:name="P23" style:family="paragraph" style:parent-style-name="Table_20_Contents" style:list-style-name="L3">
      <style:text-properties officeooo:rsid="003dedc1" officeooo:paragraph-rsid="003dedc1"/>
    </style:style>
    <style:style style:name="P24" style:family="paragraph" style:parent-style-name="Table_20_Contents" style:list-style-name="L3">
      <style:text-properties officeooo:rsid="003f6073" officeooo:paragraph-rsid="003f6073"/>
    </style:style>
    <style:style style:name="P25" style:family="paragraph" style:parent-style-name="Table_20_Contents" style:list-style-name="L3">
      <style:text-properties officeooo:rsid="0041ad0a" officeooo:paragraph-rsid="0041ad0a"/>
    </style:style>
    <style:style style:name="P26" style:family="paragraph" style:parent-style-name="Table_20_Contents" style:list-style-name="L3">
      <style:text-properties officeooo:rsid="0043f2f1" officeooo:paragraph-rsid="0043f2f1"/>
    </style:style>
    <style:style style:name="P27" style:family="paragraph" style:parent-style-name="Table_20_Contents" style:list-style-name="L3">
      <style:text-properties officeooo:rsid="004169a3" officeooo:paragraph-rsid="004169a3"/>
    </style:style>
    <style:style style:name="P28" style:family="paragraph" style:parent-style-name="Table_20_Contents" style:list-style-name="L3">
      <style:text-properties officeooo:rsid="0041fffe" officeooo:paragraph-rsid="0041fffe"/>
    </style:style>
    <style:style style:name="P29" style:family="paragraph" style:parent-style-name="Table_20_Contents">
      <style:text-properties officeooo:rsid="0044cf6c" officeooo:paragraph-rsid="0044cf6c"/>
    </style:style>
    <style:style style:name="P30" style:family="paragraph" style:parent-style-name="Table_20_Contents" style:list-style-name="L4">
      <style:text-properties officeooo:rsid="004a6cb6" officeooo:paragraph-rsid="004a6cb6"/>
    </style:style>
    <style:style style:name="P31" style:family="paragraph" style:parent-style-name="Table_20_Contents" style:list-style-name="L4">
      <style:text-properties officeooo:rsid="0047004c" officeooo:paragraph-rsid="0047004c"/>
    </style:style>
    <style:style style:name="P32" style:family="paragraph" style:parent-style-name="Table_20_Contents" style:list-style-name="L4">
      <style:text-properties officeooo:rsid="005112de" officeooo:paragraph-rsid="005112de"/>
    </style:style>
    <style:style style:name="P33" style:family="paragraph" style:parent-style-name="Table_20_Contents" style:list-style-name="L4">
      <style:text-properties officeooo:rsid="0047f67e" officeooo:paragraph-rsid="0047f67e"/>
    </style:style>
    <style:style style:name="P34" style:family="paragraph" style:parent-style-name="Table_20_Contents" style:list-style-name="L4">
      <style:text-properties officeooo:rsid="00481eba" officeooo:paragraph-rsid="00481eba"/>
    </style:style>
    <style:style style:name="P35" style:family="paragraph" style:parent-style-name="Table_20_Contents" style:list-style-name="L4">
      <style:text-properties officeooo:rsid="0055535c" officeooo:paragraph-rsid="0055535c"/>
    </style:style>
    <style:style style:name="P36" style:family="paragraph" style:parent-style-name="Table_20_Contents" style:list-style-name="L4">
      <style:text-properties officeooo:rsid="004eccac" officeooo:paragraph-rsid="004eccac"/>
    </style:style>
    <style:style style:name="P37" style:family="paragraph" style:parent-style-name="Table_20_Contents" style:list-style-name="L4">
      <style:text-properties officeooo:rsid="0054a9ee" officeooo:paragraph-rsid="0054a9ee"/>
    </style:style>
    <style:style style:name="P38" style:family="paragraph" style:parent-style-name="Table_20_Contents" style:list-style-name="L4">
      <style:text-properties officeooo:rsid="005518c1" officeooo:paragraph-rsid="005518c1"/>
    </style:style>
    <style:style style:name="P39" style:family="paragraph" style:parent-style-name="Table_20_Contents" style:list-style-name="L4">
      <style:text-properties officeooo:rsid="00487c44" officeooo:paragraph-rsid="0055535c"/>
    </style:style>
    <style:style style:name="T1" style:family="text">
      <style:text-properties officeooo:rsid="003db3d0"/>
    </style:style>
    <style:style style:name="T2" style:family="text">
      <style:text-properties officeooo:rsid="002c63cb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df975"/>
    </style:style>
    <style:style style:name="T5" style:family="text">
      <style:text-properties officeooo:rsid="002fd97a"/>
    </style:style>
    <style:style style:name="T6" style:family="text">
      <style:text-properties officeooo:rsid="0031b657"/>
    </style:style>
    <style:style style:name="T7" style:family="text">
      <style:text-properties officeooo:rsid="00341060"/>
    </style:style>
    <style:style style:name="T8" style:family="text">
      <style:text-properties officeooo:rsid="00327c1e"/>
    </style:style>
    <style:style style:name="T9" style:family="text">
      <style:text-properties officeooo:rsid="0058060e"/>
    </style:style>
    <style:style style:name="T10" style:family="text">
      <style:text-properties style:text-position="33% 80%"/>
    </style:style>
    <style:style style:name="T11" style:family="text">
      <style:text-properties officeooo:rsid="002505b8"/>
    </style:style>
    <style:style style:name="T12" style:family="text">
      <style:text-properties officeooo:rsid="0035f19e"/>
    </style:style>
    <style:style style:name="T13" style:family="text">
      <style:text-properties officeooo:rsid="003aeff2"/>
    </style:style>
    <style:style style:name="T14" style:family="text">
      <style:text-properties officeooo:rsid="003a67be"/>
    </style:style>
    <style:style style:name="T15" style:family="text">
      <style:text-properties officeooo:rsid="003f9b8b"/>
    </style:style>
    <style:style style:name="T16" style:family="text">
      <style:text-properties officeooo:rsid="00469aa1"/>
    </style:style>
    <style:style style:name="T17" style:family="text">
      <style:text-properties officeooo:rsid="004e0e23"/>
    </style:style>
    <style:style style:name="T18" style:family="text">
      <style:text-properties officeooo:rsid="0047969a"/>
    </style:style>
    <style:style style:name="T19" style:family="text">
      <style:text-properties officeooo:rsid="005613f6"/>
    </style:style>
    <style:style style:name="T20" style:family="text">
      <style:text-properties officeooo:rsid="0051fbab"/>
    </style:style>
    <style:style style:name="T21" style:family="text">
      <style:text-properties officeooo:rsid="005518c1"/>
    </style:style>
    <style:style style:name="T22" style:family="text">
      <style:text-properties officeooo:rsid="0052cc99"/>
    </style:style>
    <style:style style:name="T23" style:family="text">
      <style:text-properties officeooo:rsid="004c2f85"/>
    </style:style>
    <style:style style:name="T24" style:family="text">
      <style:text-properties officeooo:rsid="0050c7c8"/>
    </style:style>
    <style:style style:name="T25" style:family="text">
      <style:text-properties officeooo:rsid="005553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emy of Israel</text:p>
          </table:table-cell>
          <table:table-cell table:style-name="Table1.B1" office:value-type="string">
            <text:p text:style-name="P1">New testament parallel</text:p>
          </table:table-cell>
        </table:table-row>
        <table:table-row>
          <table:table-cell table:style-name="Table1.A2" office:value-type="string">
            <text:p text:style-name="P2">Amalek (descendant of Esau); <text:span text:style-name="T1">the flesh</text:span></text:p>
            <text:p text:style-name="P2"/>
            <text:list text:style-name="L1">
              <text:list-item>
                <text:p text:style-name="P3">“despised his birthright” for a morsel of meat</text:p>
              </text:list-item>
              <text:list-item>
                <text:p text:style-name="P3">the carnal man who chooses physical appetite over spiritual inheritance.</text:p>
              </text:list-item>
              <text:list-item>
                <text:p text:style-name="P4">A perpetual war</text:p>
                <text:list>
                  <text:list-item>
                    <text:p text:style-name="P5">Exodus 17:<text:span text:style-name="T2">14,</text:span>16<text:line-break/>For he said, Because the LORD hath sworn that the LORD will have war with Amalek <text:span text:style-name="T3">from generation to generation</text:span>.</text:p>
                  </text:list-item>
                </text:list>
              </text:list-item>
              <text:list-item>
                <text:p text:style-name="P4">Tactics</text:p>
                <text:list>
                  <text:list-item>
                    <text:p text:style-name="P6">Deu 25:17,18</text:p>
                  </text:list-item>
                  <text:list-item>
                    <text:p text:style-name="P7">Amalek (the flesh) attacks the faint and weary, and does not fear God.</text:p>
                  </text:list-item>
                </text:list>
              </text:list-item>
              <text:list-item>
                <text:p text:style-name="P8">Exodus 17:10,11 victory over the Amalek (the flesh) is achieved through 3 things: Moses (the rod of God), Aaron, and Hur.</text:p>
                <text:list>
                  <text:list-item>
                    <text:p text:style-name="P8">Moses – the law of God <text:span text:style-name="T4">(he is a picture of the law) </text:span>/ <text:span text:style-name="T4">the word of God (he spoke for God to the children of Israel)</text:span></text:p>
                    <text:list>
                      <text:list-item>
                        <text:p text:style-name="P9">Prophet (Deu 8:18)</text:p>
                      </text:list-item>
                    </text:list>
                  </text:list-item>
                  <text:list-item>
                    <text:p text:style-name="P8">The rod – the power of God</text:p>
                  </text:list-item>
                  <text:list-item>
                    <text:p text:style-name="P8">Aaron – <text:span text:style-name="T4">high priest (atonement)</text:span></text:p>
                    <text:list>
                      <text:list-item>
                        <text:p text:style-name="P9">Priest (Hebrew 4:15)</text:p>
                      </text:list-item>
                    </text:list>
                  </text:list-item>
                  <text:list-item>
                    <text:p text:style-name="P8">Hur – <text:span text:style-name="T4">(</text:span><text:span text:style-name="T5">Exo 31:2; </text:span><text:span text:style-name="T6">1Ch 2; </text:span><text:span text:style-name="T7">Tribe of </text:span><text:span text:style-name="T6">Judah→ Pharez→ Chelubai/</text:span><text:span text:style-name="T8">Caleb</text:span><text:span text:style-name="T6">→ Hur→ Uri→ Bezaleel)</text:span></text:p>
                    <text:list>
                      <text:list-item>
                        <text:p text:style-name="P9">King (<text:span text:style-name="T9">Revelation 17:4</text:span>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10">Romans 8:6-7<text:line-break/><text:span text:style-name="T10">6</text:span> For to be carnally minded is death; but to be spiritually minded is life and peace. <text:span text:style-name="T10">7</text:span> Because the carnal mind is enmity against God: for it is not subject to the law of God, neither indeed can be.</text:p>
              </text:list-item>
              <text:list-item>
                <text:p text:style-name="P11">The flesh is never “reformed” or “converted”. It must be fought continually until it dies.</text:p>
              </text:list-item>
              <text:list-item>
                <text:p text:style-name="P12">Romans 8:13 (victory over the flesh <text:span text:style-name="T11">is through the Spirit</text:span>)</text:p>
              </text:list-item>
            </text:list>
          </table:table-cell>
        </table:table-row>
        <table:table-row>
          <table:table-cell table:style-name="Table1.A2" office:value-type="string">
            <text:p text:style-name="P13">Philistines <text:span text:style-name="T1">(the world)</text:span></text:p>
            <text:p text:style-name="P13"/>
            <text:list text:style-name="L2">
              <text:list-item>
                <text:p text:style-name="P14">“uncircumcised” <text:span text:style-name="T12">(those outside the covenant of God)</text:span></text:p>
              </text:list-item>
              <text:list-item>
                <text:p text:style-name="P15">Lived inside the borders of the promised land.</text:p>
              </text:list-item>
              <text:list-item>
                <text:p text:style-name="P15">Genesis 26:15 (they stopped the wells that Abraham <text:span text:style-name="T13">had dug</text:span>). A picture of the world trying to cut off the believer’s access to the “living water” and the refreshment of the word of God.</text:p>
              </text:list-item>
              <text:list-item>
                <text:p text:style-name="P15">1Sa 13:19 (they take away the Hebrews weapons). The world trying to make the believer dependent on worldly systems, education, and methods for survival.</text:p>
              </text:list-item>
              <text:list-item>
                <text:p text:style-name="P16">They rely on physical might and superior technology (only what they can see).</text:p>
              </text:list-item>
              <text:list-item>
                <text:p text:style-name="P16"/>
              </text:list-item>
            </text:list>
          </table:table-cell>
          <table:table-cell table:style-name="Table1.B2" office:value-type="string">
            <text:list text:continue-numbering="true" text:style-name="L2">
              <text:list-item>
                <text:p text:style-name="P14">Col 2:12 (spiritual circumcision)</text:p>
              </text:list-item>
              <text:list-item>
                <text:p text:style-name="P17">Eph 2:11-13</text:p>
              </text:list-item>
              <text:list-item>
                <text:p text:style-name="P18">James 4:4</text:p>
              </text:list-item>
              <text:list-item>
                <text:p text:style-name="P19">Rom<text:span text:style-name="T14">ans</text:span> 12:2</text:p>
              </text:list-item>
              <text:list-item>
                <text:p text:style-name="P20">1 John 2:16</text:p>
              </text:list-item>
              <text:list-item>
                <text:p text:style-name="P21">1 John 5:4 (David &amp; Goliath)</text:p>
              </text:list-item>
              <text:list-item>
                <text:p text:style-name="P21"/>
              </text:list-item>
            </text:list>
          </table:table-cell>
        </table:table-row>
        <table:table-row>
          <table:table-cell table:style-name="Table1.A2" office:value-type="string">
            <text:p text:style-name="P22">Egypt (the world; bondage; slavery)</text:p>
            <text:p text:style-name="P22"/>
            <text:list text:style-name="L3">
              <text:list-item>
                <text:p text:style-name="P23">Exodus 1:13 (<text:span text:style-name="T15">served with </text:span>rigour)</text:p>
              </text:list-item>
              <text:list-item>
                <text:p text:style-name="P24">Exodus 5:2 - Pharaoh (type of “god of this <text:soft-page-break/>world” that refuses to let the people go and serve God)</text:p>
              </text:list-item>
              <text:list-item>
                <text:p text:style-name="P25">Deliverance by the blood of the lamb</text:p>
              </text:list-item>
              <text:list-item>
                <text:p text:style-name="P26">Exodus 14:12 (looking back when things get difficult)</text:p>
              </text:list-item>
            </text:list>
          </table:table-cell>
          <table:table-cell table:style-name="Table1.B2" office:value-type="string">
            <text:list text:continue-numbering="true" text:style-name="L3">
              <text:list-item>
                <text:p text:style-name="P23">Titus 3:3</text:p>
              </text:list-item>
              <text:list-item>
                <text:p text:style-name="P27">2Cor 4:4</text:p>
              </text:list-item>
              <text:list-item>
                <text:p text:style-name="P28">John 1:29</text:p>
              </text:list-item>
            </text:list>
          </table:table-cell>
        </table:table-row>
        <table:table-row>
          <table:table-cell table:style-name="Table1.A2" office:value-type="string">
            <text:p text:style-name="P29">Babylon (false religion; the world’s confusion <text:span text:style-name="T16">&amp; pride</text:span>)</text:p>
            <text:p text:style-name="P29"/>
            <text:list text:style-name="L4">
              <text:list-item>
                <text:p text:style-name="P30">Genesis 11:4 (human effort and organization)</text:p>
              </text:list-item>
              <text:list-item>
                <text:p text:style-name="P31">Genesis 11:9 (origin of confusion? <text:span text:style-name="T17">Lack of clarity and many voices</text:span><text:span text:style-name="T18">)</text:span></text:p>
              </text:list-item>
              <text:list-item>
                <text:p text:style-name="P32">Isa<text:span text:style-name="T19">iah</text:span> 13:19 / Jer<text:span text:style-name="T19">emiah</text:span> 51:7 <text:span text:style-name="T20">(luxury and deception)</text:span></text:p>
              </text:list-item>
              <text:list-item>
                <text:p text:style-name="P33">2Ki 25 (Israel taken into captivity because of idols) / <text:span text:style-name="T21">Psalm 137:1-4</text:span></text:p>
              </text:list-item>
              <text:list-item>
                <text:p text:style-name="P34">Daniel 3 (the golden image; Babylon always demands outward conformity to a man-made system; <text:span text:style-name="T22">forced uniformity</text:span>)</text:p>
              </text:list-item>
              <text:list-item>
                <text:p text:style-name="P35">Jer<text:span text:style-name="T19">emiah</text:span> 51:6</text:p>
              </text:list-item>
            </text:list>
          </table:table-cell>
          <table:table-cell table:style-name="Table1.B2" office:value-type="string">
            <text:list text:continue-numbering="true" text:style-name="L4">
              <text:list-item>
                <text:p text:style-name="P30">2Ti 3:5 / <text:span text:style-name="T23">Col 2:23</text:span></text:p>
              </text:list-item>
              <text:list-item>
                <text:p text:style-name="P36">Eph 4:14 / <text:span text:style-name="T24">1Cor 14:33</text:span></text:p>
              </text:list-item>
              <text:list-item>
                <text:p text:style-name="P32">Revelation 17:4</text:p>
              </text:list-item>
              <text:list-item>
                <text:p text:style-name="P37">Revelation 13:15</text:p>
              </text:list-item>
              <text:list-item>
                <text:p text:style-name="P38">Rom 8:15 / Gal 5:1</text:p>
              </text:list-item>
              <text:list-item>
                <text:p text:style-name="P39"><text:span text:style-name="T25">2Cor 6:17 / </text:span>Revelation 18:4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8:35:18.230728900</meta:creation-date>
    <dc:title>default</dc:title>
    <meta:editing-duration>PT5H39M37S</meta:editing-duration>
    <meta:editing-cycles>62</meta:editing-cycles>
    <meta:generator>LibreOffice/26.2.4.2$Linux_X86_64 LibreOffice_project/64a984c51f4702dbd3710b13428c673a2f1292e7</meta:generator>
    <dc:date>2026-07-11T12:30:06.676197987</dc:date>
    <meta:document-statistic meta:table-count="1" meta:image-count="0" meta:object-count="0" meta:page-count="2" meta:paragraph-count="56" meta:word-count="513" meta:character-count="2709" meta:non-whitespace-character-count="2296"/>
    <meta:template xlink:type="simple" xlink:actuate="onRequest" xlink:title="default" xlink:href="../../../../AppData/Roaming/LibreOffice/4/user/template/default1.ott" meta:date="2026-01-30T08:35:17.074930400"/>
  </office:meta>
</office:document-meta>
</file>