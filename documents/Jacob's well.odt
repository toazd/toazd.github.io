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061000010614D1AA3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271in" table:align="right"/>
    </style:style>
    <style:style style:name="Table1.A" style:family="table-column">
      <style:table-column-properties style:column-width="3.1271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 style:writing-mode="lr-tb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paragraph-rsid="0037f45f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left" style:justify-single-word="false"/>
      <style:text-properties fo:color="#127622" loext:opacity="100%" style:font-name="Liberation Sans1" fo:font-size="13pt" fo:font-weight="normal" officeooo:rsid="0018e7a0" officeooo:paragraph-rsid="0037f45f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1fdcb9" officeooo:paragraph-rsid="0037f45f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left" style:justify-single-word="false"/>
      <style:text-properties fo:color="#127622" loext:opacity="100%" style:font-name="Liberation Sans1" fo:font-size="13pt" fo:font-weight="normal" officeooo:rsid="0018e7a0" officeooo:paragraph-rsid="00443c07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230f54" officeooo:paragraph-rsid="002ade22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left" style:justify-single-word="false"/>
      <style:text-properties fo:color="#127622" loext:opacity="100%" style:font-name="Liberation Sans1" fo:font-size="13pt" fo:font-weight="normal" officeooo:rsid="0018e7a0" officeooo:paragraph-rsid="002ade22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2ade22" officeooo:paragraph-rsid="002ade22" style:font-size-asian="13pt" style:font-weight-asian="normal" style:font-size-complex="13pt" style:font-weight-complex="normal"/>
    </style:style>
    <style:style style:name="P8" style:family="paragraph" style:parent-style-name="Text_20_body">
      <style:text-properties style:font-name="Liberation Sans1" fo:font-size="13pt" fo:font-weight="normal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left" style:justify-single-word="false"/>
      <style:text-properties fo:color="#127622" loext:opacity="100%" style:font-name="Liberation Sans1" fo:font-size="13pt" fo:font-weight="normal" officeooo:rsid="0018e7a0" officeooo:paragraph-rsid="004901f5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230f54" officeooo:paragraph-rsid="004901f5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left" style:justify-single-word="false"/>
      <style:text-properties fo:color="#127622" loext:opacity="100%" style:font-name="Liberation Sans1" fo:font-size="13pt" fo:font-weight="normal" officeooo:rsid="0018e7a0" officeooo:paragraph-rsid="00319fec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27b945" officeooo:paragraph-rsid="00319fec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230f54" officeooo:paragraph-rsid="00230f54" style:font-size-asian="13pt" style:font-weight-asian="normal" style:font-size-complex="13pt" style:font-weight-complex="normal"/>
    </style:style>
    <style:style style:name="P14" style:family="paragraph" style:parent-style-name="Table_20_Contents">
      <style:paragraph-properties fo:text-align="left" style:justify-single-word="false"/>
      <style:text-properties fo:color="#127622" loext:opacity="100%" style:font-name="Liberation Sans1" fo:font-size="13pt" fo:font-weight="normal" officeooo:rsid="0018e7a0" officeooo:paragraph-rsid="00319fec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officeooo:paragraph-rsid="006e7a91" style:font-size-asian="13pt" style:font-size-complex="13pt"/>
    </style:style>
    <style:style style:name="P16" style:family="paragraph" style:parent-style-name="Text_20_body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34c773" officeooo:paragraph-rsid="00230f54" style:font-size-asian="13pt" style:font-weight-asian="normal" style:font-size-complex="13pt" style:font-weight-complex="normal"/>
    </style:style>
    <style:style style:name="P17" style:family="paragraph" style:parent-style-name="Table_20_Contents">
      <style:paragraph-properties fo:text-align="left" style:justify-single-word="false"/>
      <style:text-properties style:font-name="Liberation Sans1" fo:font-size="13pt" officeooo:paragraph-rsid="00762be8" style:font-size-asian="13pt" style:font-size-complex="13pt"/>
    </style:style>
    <style:style style:name="P18" style:family="paragraph" style:parent-style-name="Text_20_body" style:list-style-name="L1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729a82" officeooo:paragraph-rsid="00729a82" style:font-size-asian="13pt" style:font-weight-asian="normal" style:font-size-complex="13pt" style:font-weight-complex="normal"/>
    </style:style>
    <style:style style:name="P19" style:family="paragraph" style:parent-style-name="Table_20_Contents">
      <style:paragraph-properties fo:text-align="left" style:justify-single-word="false"/>
      <style:text-properties style:font-name="Liberation Sans1" fo:font-size="13pt" style:font-size-asian="13pt" style:font-size-complex="13pt"/>
    </style:style>
    <style:style style:name="P20" style:family="paragraph" style:parent-style-name="Table_20_Contents" style:list-style-name="L2">
      <style:paragraph-properties fo:text-align="left" style:justify-single-word="false"/>
      <style:text-properties style:font-name="Liberation Sans1" fo:font-size="13pt" fo:font-weight="normal" officeooo:rsid="004773b8" officeooo:paragraph-rsid="004773b8" style:font-size-asian="13pt" style:font-weight-asian="normal" style:font-size-complex="13pt" style:font-weight-complex="normal"/>
    </style:style>
    <style:style style:name="P21" style:family="paragraph" style:parent-style-name="Table_20_Contents">
      <style:paragraph-properties fo:text-align="left" style:justify-single-word="false"/>
      <style:text-properties style:font-name="Liberation Sans1" fo:font-size="13pt" fo:font-weight="normal" officeooo:rsid="002079f3" officeooo:paragraph-rsid="00319fec" style:font-size-asian="13pt" style:font-weight-asian="normal" style:font-size-complex="13pt" style:font-weight-complex="normal"/>
    </style:style>
    <style:style style:name="P22" style:family="paragraph" style:parent-style-name="Table_20_Contents">
      <style:paragraph-properties fo:text-align="left" style:justify-single-word="false"/>
      <style:text-properties style:font-name="Liberation Sans1" fo:font-size="13pt" officeooo:paragraph-rsid="004dd6fa" style:font-size-asian="13pt" style:font-size-complex="13pt"/>
    </style:style>
    <style:style style:name="P23" style:family="paragraph" style:parent-style-name="Standard" style:list-style-name="L3">
      <style:paragraph-properties fo:margin-top="0.0165in" fo:margin-bottom="0in" style:contextual-spacing="false" fo:text-align="left" style:justify-single-word="false" style:writing-mode="lr-tb"/>
      <style:text-properties style:font-name="Liberation Sans1" fo:font-size="13pt" fo:font-weight="normal" officeooo:rsid="005193ef" officeooo:paragraph-rsid="005193ef" style:font-size-asian="13pt" style:font-weight-asian="normal" style:font-size-complex="13pt" style:font-weight-complex="normal"/>
    </style:style>
    <style:style style:name="P24" style:family="paragraph" style:parent-style-name="Standard" style:list-style-name="L3">
      <style:paragraph-properties fo:margin-top="0.0165in" fo:margin-bottom="0in" style:contextual-spacing="false" fo:text-align="left" style:justify-single-word="false" style:writing-mode="lr-tb"/>
      <style:text-properties style:font-name="Liberation Sans1" fo:font-size="13pt" fo:font-weight="normal" officeooo:rsid="005993c1" officeooo:paragraph-rsid="005993c1" style:font-size-asian="13pt" style:font-weight-asian="normal" style:font-size-complex="13pt" style:font-weight-complex="normal"/>
    </style:style>
    <style:style style:name="P25" style:family="paragraph" style:parent-style-name="Standard" style:list-style-name="L3">
      <style:paragraph-properties fo:margin-top="0.0165in" fo:margin-bottom="0in" style:contextual-spacing="false" fo:text-align="left" style:justify-single-word="false" style:writing-mode="lr-tb"/>
      <style:text-properties style:font-name="Liberation Sans1" fo:font-size="13pt" fo:font-weight="normal" officeooo:rsid="005193ef" officeooo:paragraph-rsid="005870aa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left="0in" fo:margin-right="0.0252in" fo:margin-top="0.0165in" fo:margin-bottom="0.0165in" style:contextual-spacing="false" fo:text-align="left" style:justify-single-word="false" fo:text-indent="0in" style:auto-text-indent="false" style:writing-mode="lr-tb"/>
      <style:text-properties fo:color="#417cbe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top="0in" fo:margin-bottom="0in" style:contextual-spacing="false" fo:text-align="left" style:justify-single-word="false"/>
      <style:text-properties style:font-name="Liberation Sans1" fo:font-size="13pt" fo:font-weight="normal" officeooo:rsid="0029018f" officeooo:paragraph-rsid="0029018f" style:font-size-asian="13pt" style:font-weight-asian="normal" style:font-size-complex="13pt" style:font-weight-complex="normal"/>
    </style:style>
    <style:style style:name="T1" style:family="text">
      <style:text-properties fo:color="#127622" loext:opacity="100%"/>
    </style:style>
    <style:style style:name="T2" style:family="text">
      <style:text-properties officeooo:rsid="001c76aa"/>
    </style:style>
    <style:style style:name="T3" style:family="text">
      <style:text-properties style:text-position="super 58%" officeooo:rsid="0039c462"/>
    </style:style>
    <style:style style:name="T4" style:family="text">
      <style:text-properties officeooo:rsid="007a3a33"/>
    </style:style>
    <style:style style:name="T5" style:family="text">
      <style:text-properties style:text-position="super 58%"/>
    </style:style>
    <style:style style:name="T6" style:family="text">
      <style:text-properties officeooo:rsid="002079f3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2e67e1"/>
    </style:style>
    <style:style style:name="T9" style:family="text">
      <style:text-properties officeooo:rsid="003b9f65"/>
    </style:style>
    <style:style style:name="T10" style:family="text">
      <style:text-properties officeooo:rsid="002f4cae"/>
    </style:style>
    <style:style style:name="T11" style:family="text">
      <style:text-properties officeooo:rsid="0030698c"/>
    </style:style>
    <style:style style:name="T12" style:family="text">
      <style:text-properties officeooo:rsid="0029018f"/>
    </style:style>
    <style:style style:name="T13" style:family="text">
      <style:text-properties officeooo:rsid="0024bf29"/>
    </style:style>
    <style:style style:name="T14" style:family="text">
      <style:text-properties officeooo:rsid="0027b945"/>
    </style:style>
    <style:style style:name="T15" style:family="text">
      <style:text-properties officeooo:rsid="003ff071"/>
    </style:style>
    <style:style style:name="T16" style:family="text">
      <style:text-properties officeooo:rsid="0028ba9e"/>
    </style:style>
    <style:style style:name="T17" style:family="text">
      <style:text-properties officeooo:rsid="006e1134"/>
    </style:style>
    <style:style style:name="T18" style:family="text">
      <style:text-properties fo:font-weight="normal" officeooo:rsid="0034c773" style:font-weight-asian="normal" style:font-weight-complex="normal"/>
    </style:style>
    <style:style style:name="T19" style:family="text">
      <style:text-properties fo:font-weight="normal" officeooo:rsid="0034c773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6c2aea" style:font-weight-asian="normal" style:font-weight-complex="normal"/>
    </style:style>
    <style:style style:name="T21" style:family="text">
      <style:text-properties style:text-position="33% 80%"/>
    </style:style>
    <style:style style:name="T22" style:family="text">
      <style:text-properties officeooo:rsid="0074880d"/>
    </style:style>
    <style:style style:name="T23" style:family="text">
      <style:text-properties officeooo:rsid="0078b4cf"/>
    </style:style>
    <style:style style:name="T24" style:family="text">
      <style:text-properties officeooo:rsid="00704645"/>
    </style:style>
    <style:style style:name="T25" style:family="text">
      <style:text-properties fo:color="#127622" loext:opacity="100%" officeooo:rsid="0056a103"/>
    </style:style>
    <style:style style:name="T26" style:family="text">
      <style:text-properties fo:color="#127622" loext:opacity="100%" officeooo:rsid="005700d1"/>
    </style:style>
    <style:style style:name="T27" style:family="text">
      <style:text-properties fo:color="#127622" loext:opacity="100%" style:text-position="super 58%"/>
    </style:style>
    <style:style style:name="T28" style:family="text">
      <style:text-properties fo:color="#127622" loext:opacity="100%" style:text-position="super 58%" officeooo:rsid="004dd6fa"/>
    </style:style>
    <style:style style:name="T29" style:family="text">
      <style:text-properties style:text-position="33% 80%" officeooo:rsid="004dd6fa"/>
    </style:style>
    <style:style style:name="T30" style:family="text">
      <style:text-properties fo:color="#417cbe" loext:opacity="100%" fo:font-family="Candara" style:font-family-generic="roman" style:font-pitch="variable" fo:font-size="8pt" fo:font-weight="bold" style:font-size-asian="8pt" style:font-weight-asian="bold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officeooo:rsid="00544f46"/>
    </style:style>
    <style:style style:name="T33" style:family="text">
      <style:text-properties fo:color="#000000" loext:opacity="100%" officeooo:rsid="0056a103"/>
    </style:style>
    <style:style style:name="T34" style:family="text">
      <style:text-properties fo:color="#000000" loext:opacity="100%" officeooo:rsid="00526598"/>
    </style:style>
    <style:style style:name="T35" style:family="text">
      <style:text-properties fo:color="#000000" loext:opacity="100%" officeooo:rsid="0054b4ed"/>
    </style:style>
    <style:style style:name="T36" style:family="text">
      <style:text-properties fo:color="#000000" loext:opacity="100%" officeooo:rsid="005870aa"/>
    </style:style>
    <style:style style:name="T37" style:family="text">
      <style:text-properties fo:color="#000000" loext:opacity="100%" officeooo:rsid="0057f7b3"/>
    </style:style>
    <style:style style:name="T38" style:family="text">
      <style:text-properties fo:color="#000000" loext:opacity="100%" style:text-position="super 58%" officeooo:rsid="005870aa"/>
    </style:style>
    <style:style style:name="T39" style:family="text">
      <style:text-properties fo:color="#000000" loext:opacity="100%" officeooo:rsid="00596200"/>
    </style:style>
    <style:style style:name="T40" style:family="text">
      <style:text-properties fo:color="#000000" loext:opacity="100%" officeooo:rsid="005809c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John 4:1-43</text:span><text:line-break/><text:span text:style-name="T2">Outside the city of Sychar</text:span><text:span text:style-name="T3">G4965</text:span><text:span text:style-name="T2">, Jesus meets with a Samaritan woman at Jacob’s well, </text:span><text:span text:style-name="T4">near to the parcel of ground that Jacob gave to his son Joseph ().</text:span></text:p>
          </table:table-cell>
        </table:table-row>
        <table:table-row>
          <table:table-cell table:style-name="Table1.A2" office:value-type="string">
            <text:p text:style-name="P2">Genesis 12:6,7</text:p>
            <text:p text:style-name="P3"><draw:frame draw:style-name="fr1" draw:name="Image1" text:anchor-type="paragraph" svg:x="-4.7866in" svg:y="-1.2138in" svg:width="4.3917in" svg:height="4.3917in" draw:z-index="0"><draw:image xlink:href="Pictures/1000000100001061000010614D1AA34F.png" xlink:type="simple" xlink:show="embed" xlink:actuate="onLoad" draw:mime-type="image/png"/></draw:frame>At Sychem<text:span text:style-name="T3">G4966</text:span>/Shechem<text:span text:style-name="T5">H7927</text:span> the LORD appears to Abram and promises the land to his seed. <text:span text:style-name="T6">Abram builds an altar.</text:span></text:p>
          </table:table-cell>
        </table:table-row>
        <table:table-row>
          <table:table-cell table:style-name="Table1.A2" office:value-type="string">
            <text:p text:style-name="P4"><text:span text:style-name="T7"/></text:p>
          </table:table-cell>
        </table:table-row>
        <table:table-row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Joshua 8:30-32</text:p>
            <text:p text:style-name="P7"><text:span text:style-name="T8">After the battles at Jericho and Ai, </text:span>Joshua builds <text:span text:style-name="T9">an</text:span> altar <text:span text:style-name="T10">on mount Ebal </text:span>and writes the law of Moses on the stones <text:span text:style-name="T11">in the presence of the children of Israel.</text:span></text:p>
          </table:table-cell>
        </table:table-row>
      </table:table>
      <text:p text:style-name="P8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Deuteronomy 27:1-8</text:p>
            <text:p text:style-name="P10"><text:span text:style-name="T12">Moses and the elders of Israel command the people to write t</text:span>he words of the law on great stones and they are <text:span text:style-name="T12">to </text:span>set <text:span text:style-name="T12">the stones up o</text:span>n mount Ebal <text:span text:style-name="T12">and a</text:span><text:span text:style-name="T13">n altar is </text:span><text:span text:style-name="T12">to be</text:span><text:span text:style-name="T13"> built.</text:span></text:p>
            <text:p text:style-name="P11"/>
            <text:p text:style-name="P11">Deuteronomy 11:29, 27:11-<text:span text:style-name="T14">13, </text:span><text:span text:style-name="T15">Joshua 8:33</text:span></text:p>
            <text:p text:style-name="P12"><text:span text:style-name="T16">Moses charges the people that after they come over Jorden Simeon, Levi, Judah, Issachar, Joseph, and Benjamin will bless the people on</text:span> mount Gerizim and <text:span text:style-name="T16">Reuben, Gad, Asher, Zebulun, Dan, and Naphtali will </text:span>curse from <text:span text:style-name="T16">on </text:span>mount Ebal. <text:span text:style-name="T15">The Levites and the ark were in the middle of them (~Shechem).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Joshua 21:<text:span text:style-name="T17">20,</text:span>21</text:p>
            <text:p text:style-name="P15"><text:span text:style-name="T18">Sheche</text:span><text:span text:style-name="T19">m and its suburbs become</text:span><text:span text:style-name="T18"> a city of refuge for the slayer. </text:span><text:span text:style-name="T20">Shechem was given to the Levite family of Kohathites, the children of Kohath, of which Moses, Aaron, and Miriam were descendants of </text:span>(<text:span text:style-name="T1">Exodus 6:16-20</text:span>, <text:span text:style-name="T1">Numbers 26:58,59</text:span>)<text:span text:style-name="T20">.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<text:span text:style-name="T1">Genesis 35:1-4</text:span><text:line-break/><text:span text:style-name="T21">1</text:span> And God said unto Jacob, Arise, go up to Bethel, and dwell there: and make there an altar unto God, that appeared unto thee when thou fleddest from the face of Esau thy brother.</text:p>
            <text:p text:style-name="P17"><text:span text:style-name="T21">2</text:span> Then Jacob said unto his household, and to all that were with him, Put away the strange gods that are among you, and be clean, and change your garments:</text:p>
            <text:p text:style-name="P17"><text:span text:style-name="T21">3</text:span> And let us arise, and go up to Bethel; and I will make there an altar unto God, who answered me in the day of my distress, and was with me in the way which I went.</text:p>
            <text:p text:style-name="P17"><text:span text:style-name="T21">4</text:span> And they gave unto Jacob all the strange gods which were in their hand, and all their earrings which were in their ears; and Jacob hid them under the oak which was by Shechem.</text:p>
          </table:table-cell>
        </table:table-row>
      </table:table>
      <text:list text:style-name="L1">
        <text:list-item>
          <text:p text:style-name="P18">After Simeon and Levi slay Hamor and Shechem, Jacob is told by God to go to Bethel.</text:p>
        </text:list-item>
        <text:list-item>
          <text:p text:style-name="P18">Before they leave, Jacob buries the<text:span text:style-name="T22">ir</text:span> idols <text:span text:style-name="T22">and</text:span> earrings under a <text:span text:style-name="T23">tree</text:span> by Shechem.</text:p>
        </text:list-item>
      </text:list>
      <text:p text:style-name="P16"/>
      <text:p text:style-name="P16"/>
      <text:p text:style-name="P16"/>
      <text:p text:style-name="P16"/>
      <table:table table:name="Table6" table:style-name="Table6">
        <table:table-column table:style-name="Table6.A"/>
        <table:table-row>
          <table:table-cell table:style-name="Table6.A1" office:value-type="string">
            <text:p text:style-name="P19"><text:span text:style-name="T1">Joshua 24:1</text:span><text:line-break/>And Joshua gathered all the tribes of Israel to Shechem, and called for the elders of Israel, and for their heads, and for their judges, and for their officers; and they presented themselves before God.</text:p>
            <text:p text:style-name="P19"/>
            <text:p text:style-name="P19"><text:span text:style-name="T1">Joshua 24:26</text:span><text:line-break/>And Joshua wrote these words in the book of the law of God, and took a great stone, and set it up there under an oak, that was by the sanctuary of the LORD.</text:p>
          </table:table-cell>
        </table:table-row>
      </table:table>
      <text:list text:style-name="L2">
        <text:list-item>
          <text:p text:style-name="P20"><text:span text:style-name="T24">After conquering the land of Canaan and distributing the inheritances to the tribes of Israel, t</text:span>he tabernacle is moved from Shiloh (<text:span text:style-name="T1">Jos 18:10</text:span>) to Shechem just before Joshua dies.</text:p>
        </text:list-item>
      </text:list>
      <text:p text:style-name="P21"/>
      <table:table table:name="Table7" table:style-name="Table7">
        <table:table-column table:style-name="Table7.A"/>
        <table:table-row>
          <table:table-cell table:style-name="Table7.A1" office:value-type="string">
            <text:p text:style-name="P22"><text:span text:style-name="T1">Judges 8:30-31, </text:span><text:span text:style-name="T25">9:1-</text:span><text:span text:style-name="T26">57</text:span><text:line-break/><text:span text:style-name="T27">3</text:span><text:span text:style-name="T28">0</text:span><text:span text:style-name="T29"> </text:span>And Gideon had threescore and ten sons of his body begotten: for he had many wives.</text:p>
            <text:p text:style-name="P22"><text:span text:style-name="T27">31</text:span> And his concubine that was in Shechem, she also bare him a son, whose name he called Abimelech.</text:p>
          </table:table-cell>
        </table:table-row>
      </table:table>
      <text:list text:style-name="L3">
        <text:list-item>
          <text:p text:style-name="P23" loext:marker-style-name="T30"><text:span text:style-name="T31">Gideon/Jerubbaal’s son Abimelech becomes king of </text:span><text:span text:style-name="T32">Israel</text:span><text:span text:style-name="T31"> </text:span><text:span text:style-name="T33">for 3 years </text:span><text:span text:style-name="T34">after slaying </text:span><text:span text:style-name="T35">70</text:span><text:span text:style-name="T34"> of his brethren.</text:span></text:p>
        </text:list-item>
        <text:list-item>
          <text:p text:style-name="P24" loext:marker-style-name="T30"><text:span text:style-name="T34">H</text:span><text:span text:style-name="T31">e is made king by the men of Shechem and the house of Millo (Jdg 9:6).</text:span></text:p>
        </text:list-item>
        <text:list-item>
          <text:p text:style-name="P25" loext:marker-style-name="T30"><text:span text:style-name="T36">Gideon is t</text:span><text:span text:style-name="T37">he </text:span><text:span text:style-name="T36">5</text:span><text:span text:style-name="T38">th</text:span><text:span text:style-name="T36"> </text:span><text:span text:style-name="T37">judge God raised.</text:span></text:p>
          <text:list>
            <text:list-item>
              <text:p text:style-name="P25" loext:marker-style-name="T30"><text:span text:style-name="T39">Delivered Israel f</text:span><text:span text:style-name="T36">rom the</text:span><text:span text:style-name="T37"> </text:span><text:span text:style-name="T36">M</text:span><text:span text:style-name="T37">id</text:span><text:span text:style-name="T40">i</text:span><text:span text:style-name="T37">anites.</text:span></text:p>
            </text:list-item>
            <text:list-item>
              <text:p text:style-name="P25" loext:marker-style-name="T30"><text:span text:style-name="T36">The land was quiet (at peace?)</text:span><text:span text:style-name="T40"> for 40 years </text:span><text:span text:style-name="T36">in the days of Gideon.</text:span></text:p>
            </text:list-item>
          </text:list>
        </text:list-item>
      </text:list>
      <text:p text:style-name="P26" loext:marker-style-name="T30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17:43:48.815000000</meta:creation-date>
    <meta:editing-cycles>98</meta:editing-cycles>
    <meta:editing-duration>PT4H35M9S</meta:editing-duration>
    <dc:date>2026-07-11T12:30:59.205607879</dc:date>
    <meta:generator>LibreOffice/26.2.4.2$Linux_X86_64 LibreOffice_project/64a984c51f4702dbd3710b13428c673a2f1292e7</meta:generator>
    <meta:document-statistic meta:table-count="6" meta:image-count="1" meta:object-count="0" meta:page-count="2" meta:paragraph-count="27" meta:word-count="595" meta:character-count="3169" meta:non-whitespace-character-count="2609"/>
  </office:meta>
</office:document-meta>
</file>