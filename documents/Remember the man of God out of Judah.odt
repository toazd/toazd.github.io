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Galaxie Unicode Hebrew" svg:font-family="'Galaxie Unicode Hebrew'" style:font-adornments="Normal"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P1" style:family="paragraph" style:parent-style-name="Table_20_Contents">
      <style:text-properties officeooo:paragraph-rsid="000c6c90"/>
    </style:style>
    <style:style style:name="P2" style:family="paragraph" style:parent-style-name="Standard" style:list-style-name="L1">
      <style:text-properties officeooo:rsid="003b3498" officeooo:paragraph-rsid="003c6eba"/>
    </style:style>
    <style:style style:name="P3" style:family="paragraph" style:parent-style-name="Standard" style:list-style-name="L1">
      <style:text-properties officeooo:rsid="0040e34d" officeooo:paragraph-rsid="0040e34d"/>
    </style:style>
    <style:style style:name="P4" style:family="paragraph" style:parent-style-name="Standard" style:list-style-name="L1">
      <style:text-properties officeooo:rsid="003b93af" officeooo:paragraph-rsid="003c6eba"/>
    </style:style>
    <style:style style:name="P5" style:family="paragraph" style:parent-style-name="Standard" style:list-style-name="L1">
      <style:text-properties officeooo:rsid="0042c7ad" officeooo:paragraph-rsid="0042c7ad"/>
    </style:style>
    <style:style style:name="P6" style:family="paragraph" style:parent-style-name="Standard">
      <style:text-properties officeooo:rsid="003b3498" officeooo:paragraph-rsid="003b3498"/>
    </style:style>
    <style:style style:name="P7" style:family="paragraph" style:parent-style-name="Standard" style:list-style-name="L2">
      <style:text-properties officeooo:rsid="00281abb" officeooo:paragraph-rsid="00281abb"/>
    </style:style>
    <style:style style:name="P8" style:family="paragraph" style:parent-style-name="Standard" style:list-style-name="L2">
      <style:text-properties officeooo:rsid="0029d28c" officeooo:paragraph-rsid="0029d28c"/>
    </style:style>
    <style:style style:name="P9" style:family="paragraph" style:parent-style-name="Standard">
      <style:text-properties officeooo:rsid="00281abb" officeooo:paragraph-rsid="00281abb"/>
    </style:style>
    <style:style style:name="P10" style:family="paragraph" style:parent-style-name="Table_20_Contents">
      <style:text-properties fo:color="#127622" loext:opacity="100%" officeooo:paragraph-rsid="000454ef"/>
    </style:style>
    <style:style style:name="P11" style:family="paragraph" style:parent-style-name="Table_20_Contents">
      <style:text-properties officeooo:paragraph-rsid="000454ef"/>
    </style:style>
    <style:style style:name="P12" style:family="paragraph" style:parent-style-name="Standard" style:list-style-name="L3">
      <style:text-properties officeooo:rsid="000454ef" officeooo:paragraph-rsid="000454ef"/>
    </style:style>
    <style:style style:name="P13" style:family="paragraph" style:parent-style-name="Standard">
      <style:text-properties officeooo:rsid="000454ef" officeooo:paragraph-rsid="000454ef"/>
    </style:style>
    <style:style style:name="P14" style:family="paragraph" style:parent-style-name="Table_20_Contents">
      <style:text-properties fo:color="#127622" loext:opacity="100%" officeooo:paragraph-rsid="00271d51"/>
    </style:style>
    <style:style style:name="P15" style:family="paragraph" style:parent-style-name="Table_20_Contents">
      <style:text-properties officeooo:paragraph-rsid="00271d51"/>
    </style:style>
    <style:style style:name="P16" style:family="paragraph" style:parent-style-name="Standard" style:list-style-name="L4">
      <style:text-properties officeooo:rsid="00263c73" officeooo:paragraph-rsid="00271d51"/>
    </style:style>
    <style:style style:name="T1" style:family="text">
      <style:text-properties fo:color="#127622" loext:opacity="100%"/>
    </style:style>
    <style:style style:name="T2" style:family="text">
      <style:text-properties style:text-position="33% 80%"/>
    </style:style>
    <style:style style:name="T3" style:family="text">
      <style:text-properties fo:color="#800080" loext:opacity="100%"/>
    </style:style>
    <style:style style:name="T4" style:family="text">
      <style:text-properties fo:color="#ff8000" loext:opacity="100%"/>
    </style:style>
    <style:style style:name="T5" style:family="text">
      <style:text-properties fo:font-style="italic"/>
    </style:style>
    <style:style style:name="T6" style:family="text">
      <style:text-properties fo:color="#2a6099" loext:opacity="100%"/>
    </style:style>
    <style:style style:name="T7" style:family="text">
      <style:text-properties fo:color="#acb20c" loext:opacity="100%"/>
    </style:style>
    <style:style style:name="T8" style:family="text">
      <style:text-properties fo:color="#2a6099" loext:opacity="100%" fo:font-style="italic"/>
    </style:style>
    <style:style style:name="T9" style:family="text">
      <style:text-properties fo:color="#800080" loext:opacity="100%" fo:font-style="italic"/>
    </style:style>
    <style:style style:name="T10" style:family="text">
      <style:text-properties fo:color="#800080" loext:opacity="100%" fo:background-color="transparent" loext:char-shading-value="0"/>
    </style:style>
    <style:style style:name="T11" style:family="text">
      <style:text-properties style:use-window-font-color="true" loext:opacity="0%"/>
    </style:style>
    <style:style style:name="T12" style:family="text">
      <style:text-properties officeooo:rsid="003fdf94"/>
    </style:style>
    <style:style style:name="T13" style:family="text">
      <style:text-properties fo:color="#127622" loext:opacity="100%" officeooo:rsid="003e837f"/>
    </style:style>
    <style:style style:name="T14" style:family="text">
      <style:text-properties fo:color="#127622" loext:opacity="100%" officeooo:rsid="003c6eba"/>
    </style:style>
    <style:style style:name="T15" style:family="text">
      <style:text-properties officeooo:rsid="003c6eba"/>
    </style:style>
    <style:style style:name="T16" style:family="text">
      <style:text-properties fo:color="#127622" loext:opacity="100%" officeooo:rsid="003e66e0"/>
    </style:style>
    <style:style style:name="T17" style:family="text">
      <style:text-properties fo:color="#55215b" loext:opacity="100%"/>
    </style:style>
    <style:style style:name="T18" style:family="text">
      <style:text-properties fo:color="#127622" loext:opacity="100%" fo:font-style="italic"/>
    </style:style>
    <style:style style:name="T19" style:family="text">
      <style:text-properties officeooo:rsid="002f5d5f"/>
    </style:style>
    <style:style style:name="T20" style:family="text">
      <style:text-properties fo:color="#127622" loext:opacity="100%" officeooo:rsid="002f5d5f"/>
    </style:style>
    <style:style style:name="T21" style:family="text">
      <style:text-properties fo:color="#127622" loext:opacity="100%" officeooo:rsid="002a9dfb"/>
    </style:style>
    <style:style style:name="T22" style:family="text">
      <style:text-properties officeooo:rsid="002a9dfb"/>
    </style:style>
    <style:style style:name="T23" style:family="text">
      <style:text-properties fo:color="#127622" loext:opacity="100%" officeooo:rsid="002b2eab"/>
    </style:style>
    <style:style style:name="T24" style:family="text">
      <style:text-properties fo:color="#127622" loext:opacity="100%" officeooo:rsid="002bb7d3"/>
    </style:style>
    <style:style style:name="T25" style:family="text">
      <style:text-properties fo:color="#127622" loext:opacity="100%" officeooo:rsid="002cd8ae"/>
    </style:style>
    <style:style style:name="T26" style:family="text">
      <style:text-properties fo:color="#127622" loext:opacity="100%" officeooo:rsid="002de2f2"/>
    </style:style>
    <style:style style:name="T27" style:family="text">
      <style:text-properties fo:color="#127622" loext:opacity="100%" officeooo:rsid="002dfc48"/>
    </style:style>
    <style:style style:name="T28" style:family="text">
      <style:text-properties officeooo:rsid="002dfc48"/>
    </style:style>
    <style:style style:name="T29" style:family="text">
      <style:text-properties fo:color="#127622" loext:opacity="100%" officeooo:rsid="002e4511"/>
    </style:style>
    <style:style style:name="T30" style:family="text">
      <style:text-properties fo:background-color="#fff5ce"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text:span text:style-name="T1">1 Kings 13:1-34</text:span><text:line-break/><text:span text:style-name="T2">1</text:span> And, behold, there came <text:span text:style-name="T3">a man of God</text:span> out of Judah by the word of the LORD unto Beth-el: and <text:span text:style-name="T4">Jeroboam</text:span> stood by the altar to burn incense.</text:p>
            <text:p text:style-name="P1"><text:span text:style-name="T2">2</text:span> And <text:span text:style-name="T3">he</text:span> cried against the altar in the word of the LORD, and said, <text:span text:style-name="T3">O altar, altar, thus saith the LORD; Behold, a child shall be born unto the house of David, Josiah by name; and upon thee shall he offer the priests of the high places that burn incense upon thee, and men's bones shall be burnt upon thee.</text:span></text:p>
            <text:p text:style-name="P1"><text:span text:style-name="T2">3</text:span> And <text:span text:style-name="T3">he</text:span> gave a sign the same day, saying, This <text:span text:style-name="T5">is</text:span> the sign which the LORD hath spoken; Behold, the altar shall be rent, and the ashes that <text:span text:style-name="T5">are</text:span> upon it shall be poured out.</text:p>
            <text:p text:style-name="P1"><text:span text:style-name="T2">4</text:span> And it came to pass, when <text:span text:style-name="T4">king Jeroboam</text:span> heard the saying of the <text:span text:style-name="T3">man of God</text:span>, which had cried against the altar in Beth-el, that <text:span text:style-name="T4">he</text:span> put forth <text:span text:style-name="T4">his</text:span> hand from the altar, saying, <text:span text:style-name="T4">Lay hold on </text:span><text:span text:style-name="T3">him</text:span>. And <text:span text:style-name="T4">his</text:span> hand, which <text:span text:style-name="T4">he</text:span> put forth against <text:span text:style-name="T3">him</text:span>, dried up, so that <text:span text:style-name="T4">he</text:span> could not pull it in again to <text:span text:style-name="T4">him</text:span>.</text:p>
            <text:p text:style-name="P1"><text:span text:style-name="T2">5</text:span> The altar also was rent, and the ashes poured out from the altar, according to the sign which the <text:span text:style-name="T3">man of God</text:span> had given by the word of the LORD.</text:p>
            <text:p text:style-name="P1"><text:span text:style-name="T2">6</text:span> And <text:span text:style-name="T4">the king</text:span> answered and said unto the <text:span text:style-name="T3">man of God</text:span>, <text:span text:style-name="T4">Intreat now the face of the LORD thy God, and pray for me, that my hand may be restored me again.</text:span> And <text:span text:style-name="T3">the man of God</text:span> besought the LORD, and <text:span text:style-name="T4">the</text:span> <text:span text:style-name="T4">king's</text:span> hand was restored <text:span text:style-name="T4">him</text:span> again, and became as <text:span text:style-name="T5">it was</text:span> before.</text:p>
            <text:p text:style-name="P1"><text:span text:style-name="T2">7</text:span> And <text:span text:style-name="T4">the king</text:span> said unto the <text:span text:style-name="T3">man of God</text:span>, <text:span text:style-name="T4">Come home with me, and refresh </text:span><text:span text:style-name="T3">thyself</text:span><text:span text:style-name="T4">, and I will give </text:span><text:span text:style-name="T3">thee</text:span><text:span text:style-name="T4"> a reward.</text:span></text:p>
            <text:p text:style-name="P1"><text:span text:style-name="T2">8</text:span> And <text:span text:style-name="T3">the man of God</text:span> said unto <text:span text:style-name="T4">the king</text:span>, <text:span text:style-name="T3">If </text:span><text:span text:style-name="T4">thou</text:span><text:span text:style-name="T3"> wilt give me half </text:span><text:span text:style-name="T4">thine</text:span><text:span text:style-name="T3"> house, I will not go in with </text:span><text:span text:style-name="T4">thee</text:span><text:span text:style-name="T3">, neither will I eat bread nor drink water in this place:</text:span></text:p>
            <text:p text:style-name="P1"><text:span text:style-name="T2">9</text:span> <text:span text:style-name="T3">For so was it charged me by the word of the LORD, saying, Eat no bread, nor drink water, nor turn again by the same way that thou camest.</text:span></text:p>
            <text:p text:style-name="P1"><text:span text:style-name="T2">10</text:span> So <text:span text:style-name="T3">he</text:span> went another way, and returned not by the way that <text:span text:style-name="T3">he</text:span> came to Beth-el.</text:p>
            <text:p text:style-name="P1"><text:span text:style-name="T2">11</text:span> Now there dwelt <text:span text:style-name="T6">an old prophet</text:span> in Beth-el; and <text:span text:style-name="T6">his</text:span> <text:span text:style-name="T7">sons</text:span> came and told <text:span text:style-name="T6">him</text:span> all the works that the <text:span text:style-name="T3">man of God</text:span> had done that day in Beth-el: the words which <text:span text:style-name="T3">he</text:span> had spoken unto <text:span text:style-name="T4">the king</text:span>, them <text:span text:style-name="T7">they</text:span> told also to <text:span text:style-name="T6">their father</text:span>.</text:p>
            <text:p text:style-name="P1"><text:span text:style-name="T2">12</text:span> And <text:span text:style-name="T6">their father</text:span> said unto <text:span text:style-name="T7">them</text:span>, <text:span text:style-name="T6">What way went he?</text:span> For <text:span text:style-name="T6">his</text:span> <text:span text:style-name="T7">sons</text:span> had seen what way <text:span text:style-name="T3">the man of God</text:span> went, which came from Judah.</text:p>
            <text:p text:style-name="P1"><text:span text:style-name="T2">13</text:span> And <text:span text:style-name="T6">he</text:span> said unto <text:span text:style-name="T6">his</text:span> <text:span text:style-name="T7">sons</text:span>, <text:span text:style-name="T6">Saddle me the ass.</text:span> So <text:span text:style-name="T7">they</text:span> saddled <text:span text:style-name="T6">him</text:span> the ass: and <text:span text:style-name="T6">he</text:span> rode thereon,</text:p>
            <text:p text:style-name="P1"><text:span text:style-name="T2">14</text:span> And went after <text:span text:style-name="T3">the man of God</text:span>, and found <text:span text:style-name="T3">him</text:span> sitting under an oak: and <text:span text:style-name="T6">he</text:span> said unto him, <text:span text:style-name="T8">Art</text:span><text:span text:style-name="T6"> thou the man of God that camest from Judah?</text:span> And <text:span text:style-name="T3">he</text:span> said, <text:span text:style-name="T3">I </text:span><text:span text:style-name="T9">am</text:span><text:span text:style-name="T3">.</text:span></text:p>
            <text:p text:style-name="P1"><text:span text:style-name="T2">15</text:span> Then <text:span text:style-name="T6">he</text:span> said unto <text:span text:style-name="T3">him</text:span>, <text:span text:style-name="T6">Come home with me, and eat bread.</text:span></text:p>
            <text:p text:style-name="P1"><text:span text:style-name="T2">16</text:span> And <text:span text:style-name="T3">he</text:span> said, <text:span text:style-name="T3">I may not return with </text:span><text:span text:style-name="T6">thee</text:span><text:span text:style-name="T3">, nor go in with </text:span><text:span text:style-name="T6">thee</text:span><text:span text:style-name="T3">: neither will I eat bread nor drink water with </text:span><text:span text:style-name="T6">thee</text:span><text:span text:style-name="T3"> in this place:</text:span></text:p>
            <text:p text:style-name="P1"><text:span text:style-name="T2">17</text:span> <text:span text:style-name="T3">For it was said to me by the word of the LORD, Thou shalt eat no bread nor drink water there, nor turn again to go by the way that thou camest.</text:span></text:p>
            <text:p text:style-name="P1"><text:span text:style-name="T2">18</text:span> <text:span text:style-name="T6">He</text:span> said unto <text:span text:style-name="T3">him</text:span>, <text:span text:style-name="T6">I </text:span><text:span text:style-name="T8">am</text:span><text:span text:style-name="T6"> a prophet also as </text:span><text:span text:style-name="T3">thou</text:span><text:span text:style-name="T6"> </text:span><text:span text:style-name="T8">art</text:span><text:span text:style-name="T6">; and an angel spake unto me by the word of the LORD, saying, Bring </text:span><text:span text:style-name="T3">him</text:span><text:span text:style-name="T6"> back with thee into thine house, that </text:span><text:span text:style-name="T3">he</text:span><text:span text:style-name="T6"> may eat bread and drink water.</text:span> <text:span text:style-name="T5">But</text:span> <text:span text:style-name="T6">he</text:span> lied unto <text:span text:style-name="T3">him</text:span>.</text:p>
            <text:p text:style-name="P1"><text:span text:style-name="T2">19</text:span> So <text:span text:style-name="T3">he</text:span> went back with <text:span text:style-name="T6">him</text:span>, and did eat bread in <text:span text:style-name="T6">his</text:span> house, and drank water.</text:p>
            <text:p text:style-name="P1"><text:span text:style-name="T2">20</text:span> And it came to pass, as they sat at the table, that the word of the LORD came unto <text:span text:style-name="T6">the prophet</text:span> that brought <text:span text:style-name="T3">him</text:span> back:</text:p>
            <text:p text:style-name="P1"><text:span text:style-name="T2">21</text:span> And <text:span text:style-name="T6">he</text:span> cried unto <text:span text:style-name="T3">the man of God</text:span> that came from Judah, saying, <text:span text:style-name="T6">Thus saith the LORD, Forasmuch as </text:span><text:span text:style-name="T3">thou</text:span><text:span text:style-name="T6"> hast disobeyed the mouth of the LORD, and hast not kept the commandment which the LORD </text:span><text:span text:style-name="T3">thy</text:span><text:span text:style-name="T6"> God commanded </text:span><text:span text:style-name="T3">thee</text:span><text:span text:style-name="T6">,</text:span></text:p>
            <text:p text:style-name="P1"><text:span text:style-name="T2">22</text:span> <text:span text:style-name="T6">But camest back, and hast eaten bread and drunk water in the place, of the which </text:span><text:span text:style-name="T8">the LORD</text:span><text:span text:style-name="T6"> did say to </text:span><text:span text:style-name="T3">thee</text:span><text:span text:style-name="T6">, Eat no bread, and drink no water; </text:span><text:span text:style-name="T3">thy</text:span><text:span text:style-name="T6"> carcase shall not come unto the sepulchre of </text:span><text:span text:style-name="T3">thy</text:span><text:span text:style-name="T6"> fathers.</text:span></text:p>
            <text:p text:style-name="P1"><text:span text:style-name="T2">23</text:span> And it came to pass, after <text:span text:style-name="T6">he</text:span> had eaten bread, and after <text:span text:style-name="T6">he</text:span> had drunk, that <text:span text:style-name="T6">he</text:span> saddled for <text:span text:style-name="T3">him</text:span> the ass, <text:span text:style-name="T5">to wit</text:span>, for <text:span text:style-name="T3">the prophet</text:span> whom <text:span text:style-name="T6">he</text:span> had brought back.</text:p>
            <text:p text:style-name="P1"><text:soft-page-break/><text:span text:style-name="T2">24</text:span> And when <text:span text:style-name="T3">he</text:span> was gone, a lion met <text:span text:style-name="T3">him</text:span> by the way, and slew <text:span text:style-name="T3">him</text:span>: and <text:span text:style-name="T3">his</text:span> carcase was cast in the way, and the ass stood by it, the lion also stood by <text:span text:style-name="T3">the carcase</text:span>.</text:p>
            <text:p text:style-name="P1"><text:span text:style-name="T2">25</text:span> And, behold, men passed by, and saw <text:span text:style-name="T3">the carcase</text:span> cast in the way, and the lion standing by <text:span text:style-name="T3">the carcase</text:span>: and they came and told <text:span text:style-name="T5">it</text:span> in the city where <text:span text:style-name="T6">the old prophet</text:span> dwelt.</text:p>
            <text:p text:style-name="P1"><text:span text:style-name="T2">26</text:span> And when <text:span text:style-name="T6">the prophet</text:span> that brought <text:span text:style-name="T3">him</text:span> back from the way heard <text:span text:style-name="T5">thereof</text:span>, <text:span text:style-name="T6">he</text:span> said, <text:span text:style-name="T6">It </text:span><text:span text:style-name="T8">is</text:span><text:span text:style-name="T6"> </text:span><text:span text:style-name="T3">the man of God</text:span><text:span text:style-name="T6">, who was disobedient unto the word of the LORD: therefore the LORD hath delivered </text:span><text:span text:style-name="T3">him</text:span><text:span text:style-name="T6"> unto the lion, which hath torn </text:span><text:span text:style-name="T3">him</text:span><text:span text:style-name="T6">, and slain </text:span><text:span text:style-name="T3">him</text:span><text:span text:style-name="T6">, according to the word of the LORD, which he spake unto </text:span><text:span text:style-name="T3">him</text:span><text:span text:style-name="T6">.</text:span></text:p>
            <text:p text:style-name="P1"><text:span text:style-name="T2">27</text:span> And <text:span text:style-name="T6">he</text:span> spake to <text:span text:style-name="T6">his</text:span> <text:span text:style-name="T7">sons</text:span>, saying, <text:span text:style-name="T6">Saddle me the ass.</text:span> And <text:span text:style-name="T7">they</text:span> saddled <text:span text:style-name="T8">him</text:span>.</text:p>
            <text:p text:style-name="P1"><text:span text:style-name="T2">28</text:span> And <text:span text:style-name="T6">he</text:span> went and found <text:span text:style-name="T3">his carcase</text:span> cast in the way, and the ass and the lion standing by <text:span text:style-name="T3">the carcase</text:span>: the lion had not eaten <text:span text:style-name="T3">the carcase</text:span>, nor torn the ass.<text:line-break/><text:span text:style-name="T2">29</text:span> And <text:span text:style-name="T6">the prophet</text:span> took up <text:span text:style-name="T3">the carcase</text:span> of <text:span text:style-name="T3">the man of God</text:span>, and laid it upon the ass, and brought it back: and <text:span text:style-name="T6">the old prophet</text:span> came to the city, to mourn and to bury <text:span text:style-name="T3">him</text:span>.</text:p>
            <text:p text:style-name="P1"><text:span text:style-name="T2">30</text:span> And <text:span text:style-name="T6">he</text:span> laid <text:span text:style-name="T3">his carcase</text:span> in <text:span text:style-name="T6">his</text:span> own grave; and they mourned over <text:span text:style-name="T3">him</text:span>, <text:span text:style-name="T5">saying</text:span>, Alas, <text:span text:style-name="T3">my brother</text:span>!</text:p>
            <text:p text:style-name="P1"><text:span text:style-name="T2">31</text:span> And it came to pass, after <text:span text:style-name="T6">he</text:span> had buried <text:span text:style-name="T3">him</text:span>, that <text:span text:style-name="T6">he</text:span> spake to <text:span text:style-name="T6">his</text:span> <text:span text:style-name="T7">sons</text:span>, saying, <text:span text:style-name="T6">When I am dead, then bury me in the sepulchre wherein </text:span><text:span text:style-name="T10">the man of God</text:span><text:span text:style-name="T6"> </text:span><text:span text:style-name="T8">is</text:span><text:span text:style-name="T6"> buried; lay my bones beside </text:span><text:span text:style-name="T3">his</text:span><text:span text:style-name="T6"> bones:</text:span></text:p>
            <text:p text:style-name="P1"><text:span text:style-name="T2">32</text:span> <text:span text:style-name="T6">For the saying which </text:span><text:span text:style-name="T3">he</text:span><text:span text:style-name="T6"> cried by the word of the LORD against the altar in Beth-el, and against all the houses of the high places which </text:span><text:span text:style-name="T8">are</text:span><text:span text:style-name="T6"> in the cities of Samaria, shall surely come to pass.</text:span></text:p>
            <text:p text:style-name="P1"><text:span text:style-name="T2">33</text:span> After this thing <text:span text:style-name="T4">Jeroboam</text:span> returned not from <text:span text:style-name="T4">his</text:span> evil way, but made again of the lowest of the people priests of the high places: whosoever would, <text:span text:style-name="T4">he</text:span> consecrated him, and <text:span text:style-name="T11">he</text:span> became <text:span text:style-name="T5">one</text:span> of the priests of the high places.</text:p>
            <text:p text:style-name="P1"><text:span text:style-name="T2">34</text:span> And this thing became sin unto the house of <text:span text:style-name="T4">Jeroboam</text:span>, even to cut <text:span text:style-name="T5">it</text:span> off, and to destroy <text:span text:style-name="T5">it</text:span> from off the face of the earth.</text:p>
          </table:table-cell>
        </table:table-row>
      </table:table>
      <text:list text:style-name="L1">
        <text:list-item>
          <text:p text:style-name="P2"><text:span text:style-name="T12">v</text:span>18 - <text:span text:style-name="T1">Proverbs 3:5,6</text:span>, <text:span text:style-name="T1">John 14:26</text:span>, <text:span text:style-name="T1">16:13</text:span></text:p>
          <text:list>
            <text:list-item>
              <text:p text:style-name="P3">What we should do and how we should do it does not come from men (<text:span text:style-name="T1">Jer 10:23</text:span>).</text:p>
            </text:list-item>
          </text:list>
        </text:list-item>
        <text:list-item>
          <text:p text:style-name="P4">v26 - <text:span text:style-name="T13">H</text:span><text:span text:style-name="T14">osea 13:6-8</text:span><text:span text:style-name="T15">, </text:span><text:span text:style-name="T16">1 Peter 5:8</text:span></text:p>
          <text:list>
            <text:list-item>
              <text:p text:style-name="P5">Disobedience to God, saved or not, has the same outcome: <text:span text:style-name="T1">Romans 6:23a</text:span>.</text:p>
            </text:list-item>
          </text:list>
        </text:list-item>
      </text:list>
      <text:p text:style-name="P6"/>
      <text:p text:style-name="P6"/>
      <table:table table:name="Table3" table:style-name="Table3">
        <table:table-column table:style-name="Table3.A"/>
        <table:table-row>
          <table:table-cell table:style-name="Table3.A1" office:value-type="string">
            <text:p text:style-name="P1"><text:span text:style-name="T1">2 Kings 23:15-18</text:span><text:line-break/><text:span text:style-name="T2">15</text:span> Moreover the altar that <text:span text:style-name="T5">was</text:span> at Beth-el, <text:span text:style-name="T5">and</text:span> the high place which <text:span text:style-name="T4">Jeroboam the son of Nebat</text:span>, who made Israel to sin, had made, both that altar and the high place <text:span text:style-name="T17">he</text:span> brake down, and burned the high place, <text:span text:style-name="T5">and</text:span> stamped <text:span text:style-name="T5">it</text:span> small to powder, and burned the grove.</text:p>
            <text:p text:style-name="P1"><text:span text:style-name="T2">16</text:span> And as <text:span text:style-name="T1">Josiah</text:span> turned <text:span text:style-name="T1">himself</text:span>, <text:span text:style-name="T1">he</text:span> spied the sepulchres that <text:span text:style-name="T5">were</text:span> there in the mount, and sent, and took the bones out of the sepulchres, and burned <text:span text:style-name="T5">them</text:span> upon the altar, and polluted it, according to the word of the LORD which <text:span text:style-name="T3">the man of God</text:span> proclaimed, <text:span text:style-name="T3">who</text:span> proclaimed these words.</text:p>
            <text:p text:style-name="P1"><text:span text:style-name="T2">17</text:span> Then <text:span text:style-name="T1">he</text:span> said, <text:span text:style-name="T1">What title </text:span><text:span text:style-name="T18">is</text:span><text:span text:style-name="T1"> that that I see?</text:span> And the men of the city told him, <text:span text:style-name="T5">It is</text:span> the sepulchre of <text:span text:style-name="T3">the man of God</text:span>, which came from Judah, and proclaimed these things that <text:span text:style-name="T17">thou</text:span> hast done against the altar of Beth-el.</text:p>
            <text:p text:style-name="P1"><text:span text:style-name="T2">18</text:span> And <text:span text:style-name="T1">he</text:span> said, Let <text:span text:style-name="T3">him</text:span> alone; let no man move <text:span text:style-name="T3">his</text:span> bones. So they let <text:span text:style-name="T3">his</text:span> bones alone, with the bones of <text:span text:style-name="T6">the prophet that came out of Samaria</text:span>.</text:p>
          </table:table-cell>
        </table:table-row>
      </table:table>
      <text:list text:style-name="L2">
        <text:list-item>
          <text:p text:style-name="P7">The prophecy is fulfilled 14 generations later by Josiah the son of Amon <text:span text:style-name="T19">(</text:span><text:span text:style-name="T20">2Ki 21:24</text:span><text:span text:style-name="T19">).</text:span></text:p>
          <text:list>
            <text:list-item>
              <text:p text:style-name="P8"><text:span text:style-name="T1">1Ki 12:20, 14:21,31, 15:8,24, </text:span><text:span text:style-name="T21">22:50</text:span><text:span text:style-name="T22">, </text:span><text:span text:style-name="T23">2Ki 8:24, 11:12, 12:20,21, </text:span><text:span text:style-name="T24">14:21, </text:span><text:span text:style-name="T25">15:7,</text:span><text:span text:style-name="T26">38, </text:span><text:span text:style-name="T27">16:20, 20:21,</text:span><text:span text:style-name="T28"> </text:span><text:span text:style-name="T29">21:18, 21:24</text:span></text:p>
            </text:list-item>
          </text:list>
        </text:list-item>
      </text:list>
      <text:p text:style-name="P9"/>
      <text:p text:style-name="P9"/>
      <table:table table:name="Table2" table:style-name="Table2">
        <table:table-column table:style-name="Table2.A"/>
        <table:table-row>
          <table:table-cell table:style-name="Table2.A1" office:value-type="string">
            <text:p text:style-name="P10">1 Kings 12:22</text:p>
            <text:p text:style-name="P11">But the word of God came unto <text:span text:style-name="T30">Shemaiah the man of God</text:span>, saying,</text:p>
          </table:table-cell>
        </table:table-row>
      </table:table>
      <text:list text:style-name="L3">
        <text:list-item>
          <text:p text:style-name="P12">The last man of God mentioned before <text:span text:style-name="T1">1Ki 13:1</text:span></text:p>
        </text:list-item>
      </text:list>
      <text:p text:style-name="P13"/>
      <table:table table:name="Table4" table:style-name="Table4">
        <table:table-column table:style-name="Table4.A"/>
        <text:soft-page-break/>
        <table:table-row>
          <table:table-cell table:style-name="Table4.A1" office:value-type="string">
            <text:p text:style-name="P14">2 Chronicles 9:29</text:p>
            <text:p text:style-name="P15">Now the rest of the acts of Solomon, first and last, are they not written in the book of Nathan the prophet, and in the prophecy of Ahijah the Shilonite, and in the visions of <text:span text:style-name="T30">Iddo the seer against Jeroboam the son of Nebat</text:span>?</text:p>
          </table:table-cell>
        </table:table-row>
      </table:table>
      <text:list text:style-name="L4">
        <text:list-item>
          <text:p text:style-name="P16">Another possibility for the identity of the man of God of <text:span text:style-name="T1">1Ki 13</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Galaxie Unicode Hebrew" svg:font-family="'Galaxie Unicode Hebrew'" style:font-adornments="Normal"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name-complex="Galaxie Unicode Hebrew" style:font-family-complex="'Galaxie Unicode Hebrew'" style:font-style-name-complex="Normal" style:font-pitch-complex="variable" style:language-complex="he" style:country-complex="IL"/>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2T12:49:15.784046700</meta:creation-date>
    <dc:title>The man of God out of Judah</dc:title>
    <meta:editing-duration>PT3H55S</meta:editing-duration>
    <meta:editing-cycles>70</meta:editing-cycles>
    <meta:generator>LibreOffice/26.2.4.2$Linux_X86_64 LibreOffice_project/64a984c51f4702dbd3710b13428c673a2f1292e7</meta:generator>
    <dc:date>2026-07-11T12:29:56.328170158</dc:date>
    <meta:document-statistic meta:table-count="4" meta:image-count="0" meta:object-count="0" meta:page-count="3" meta:paragraph-count="49" meta:word-count="1521" meta:character-count="7388" meta:non-whitespace-character-count="5924"/>
    <meta:template xlink:type="simple" xlink:actuate="onRequest" xlink:title="default" xlink:href="../../../../AppData/Roaming/LibreOffice/4/user/template/default1.ott" meta:date="2025-07-12T12:49:14.642785200"/>
  </office:meta>
</office:document-meta>
</file>