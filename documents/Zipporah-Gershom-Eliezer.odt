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BlackChancery" svg:font-family="BlackChancery"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8" style:family="table">
      <style:table-properties style:width="8.2in" table:align="margins"/>
    </style:style>
    <style:style style:name="Table8.A" style:family="table-column">
      <style:table-column-properties style:column-width="4.1in" style:rel-column-width="32768*"/>
    </style:style>
    <style:style style:name="Table8.B" style:family="table-column">
      <style:table-column-properties style:column-width="4.1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3" style:family="table">
      <style:table-properties style:width="8.2in" table:align="margins"/>
    </style:style>
    <style:style style:name="Table3.A" style:family="table-column">
      <style:table-column-properties style:column-width="4.1in" style:rel-column-width="32767*"/>
    </style:style>
    <style:style style:name="Table3.B" style:family="table-column">
      <style:table-column-properties style:column-width="4.1in" style:rel-column-width="32768*"/>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2in" table:align="margins"/>
    </style:style>
    <style:style style:name="Table4.A" style:family="table-column">
      <style:table-column-properties style:column-width="2.7333in" style:rel-column-width="21845*"/>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4" style:family="table-row">
      <style:table-row-properties style:min-row-height="2.4028in"/>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5.3" style:family="table-row">
      <style:table-row-properties style:min-row-height="6.6667in"/>
    </style:style>
    <style:style style:name="Table10" style:family="table">
      <style:table-properties style:width="8.2in" table:align="margins"/>
    </style:style>
    <style:style style:name="Table10.A" style:family="table-column">
      <style:table-column-properties style:column-width="5.0382in" style:rel-column-width="40265*"/>
    </style:style>
    <style:style style:name="Table10.B" style:family="table-column">
      <style:table-column-properties style:column-width="3.1618in" style:rel-column-width="25270*"/>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left="none" fo:border-right="0.5pt solid #000000" fo:border-top="0.5pt solid #000000" fo:border-bottom="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none" fo:border-right="0.5pt solid #000000" fo:border-top="none" fo:border-bottom="0.5pt solid #000000"/>
    </style:style>
    <style:style style:name="Table10.3" style:family="table-row">
      <style:table-row-properties style:min-row-height="0.3486in"/>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8.2in" table:align="margins"/>
    </style:style>
    <style:style style:name="Table7.A" style:family="table-column">
      <style:table-column-properties style:column-width="8.2in" style:rel-column-width="65535*"/>
    </style:style>
    <style:style style:name="Table7.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BlackChancery" fo:font-size="16pt" officeooo:rsid="00af1972" officeooo:paragraph-rsid="00d0359a" style:font-size-asian="16pt" style:font-size-complex="16pt"/>
    </style:style>
    <style:style style:name="P2" style:family="paragraph" style:parent-style-name="Table_20_Contents">
      <loext:graphic-properties draw:fill="none" draw:fill-color="#ffffff"/>
      <style:paragraph-properties fo:background-color="transparent"/>
      <style:text-properties officeooo:paragraph-rsid="016c98eb"/>
    </style:style>
    <style:style style:name="P3" style:family="paragraph" style:parent-style-name="Table_20_Contents">
      <style:text-properties style:font-name="Gabriela Nerd Font" officeooo:paragraph-rsid="016c98eb"/>
    </style:style>
    <style:style style:name="P4" style:family="paragraph" style:parent-style-name="Table_20_Contents" style:list-style-name="L1">
      <style:text-properties officeooo:rsid="006c8b25" officeooo:paragraph-rsid="00d6df49"/>
    </style:style>
    <style:style style:name="P5" style:family="paragraph" style:parent-style-name="Standard">
      <style:paragraph-properties fo:text-align="center" style:justify-single-word="false"/>
      <style:text-properties style:font-name="BlackChancery" fo:font-size="16pt" officeooo:rsid="01f91a98" officeooo:paragraph-rsid="01f91a98" style:font-size-asian="16pt" style:font-size-complex="16pt"/>
    </style:style>
    <style:style style:name="P6" style:family="paragraph" style:parent-style-name="Table_20_Contents">
      <style:text-properties fo:color="#127622" loext:opacity="100%" style:font-name="Gabriela Nerd Font" officeooo:paragraph-rsid="00d3169f"/>
    </style:style>
    <style:style style:name="P7" style:family="paragraph" style:parent-style-name="Table_20_Contents">
      <style:text-properties officeooo:paragraph-rsid="00d3169f"/>
    </style:style>
    <style:style style:name="P8" style:family="paragraph" style:parent-style-name="Table_20_Contents">
      <style:text-properties fo:color="#127622" loext:opacity="100%" style:font-name="Gabriela Nerd Font" officeooo:paragraph-rsid="00d499b7"/>
    </style:style>
    <style:style style:name="P9" style:family="paragraph" style:parent-style-name="Table_20_Contents">
      <style:text-properties officeooo:paragraph-rsid="00d499b7"/>
    </style:style>
    <style:style style:name="P10" style:family="paragraph" style:parent-style-name="Table_20_Contents">
      <style:text-properties fo:color="#127622" loext:opacity="100%" style:font-name="Gabriela Nerd Font" officeooo:paragraph-rsid="00d57b6d"/>
    </style:style>
    <style:style style:name="P11" style:family="paragraph" style:parent-style-name="Table_20_Contents">
      <style:text-properties officeooo:paragraph-rsid="00d57b6d"/>
    </style:style>
    <style:style style:name="P12" style:family="paragraph" style:parent-style-name="Standard" style:list-style-name="L2">
      <style:text-properties officeooo:rsid="00d8d2bc" officeooo:paragraph-rsid="00d8d2bc"/>
    </style:style>
    <style:style style:name="P13" style:family="paragraph" style:parent-style-name="Standard" style:list-style-name="L2">
      <style:text-properties officeooo:rsid="01272b3d" officeooo:paragraph-rsid="01272b3d"/>
    </style:style>
    <style:style style:name="P14" style:family="paragraph" style:parent-style-name="Standard" style:list-style-name="L2">
      <style:text-properties officeooo:rsid="00ff67bf" officeooo:paragraph-rsid="00ff67bf"/>
    </style:style>
    <style:style style:name="P15" style:family="paragraph" style:parent-style-name="Standard" style:list-style-name="L2">
      <style:text-properties officeooo:paragraph-rsid="012a6966"/>
    </style:style>
    <style:style style:name="P16" style:family="paragraph" style:parent-style-name="Table_20_Contents" style:list-style-name="L2">
      <style:text-properties officeooo:rsid="009e4a2f" officeooo:paragraph-rsid="012d02b8"/>
    </style:style>
    <style:style style:name="P17" style:family="paragraph" style:parent-style-name="Standard">
      <style:text-properties officeooo:rsid="00dc18d2" officeooo:paragraph-rsid="00dc18d2"/>
    </style:style>
    <style:style style:name="P18" style:family="paragraph" style:parent-style-name="Standard">
      <style:paragraph-properties fo:text-align="center" style:justify-single-word="false"/>
      <style:text-properties style:font-name="BlackChancery" fo:font-size="16pt" officeooo:rsid="01fb6d0d" officeooo:paragraph-rsid="01fb6d0d" style:font-size-asian="16pt" style:font-size-complex="16pt"/>
    </style:style>
    <style:style style:name="P19" style:family="paragraph" style:parent-style-name="Table_20_Contents">
      <style:text-properties officeooo:paragraph-rsid="0083cbec"/>
    </style:style>
    <style:style style:name="P20" style:family="paragraph" style:parent-style-name="Table_20_Contents" style:list-style-name="L3">
      <style:text-properties style:use-window-font-color="true" loext:opacity="0%" officeooo:rsid="0088e778" officeooo:paragraph-rsid="0088e778"/>
    </style:style>
    <style:style style:name="P21" style:family="paragraph" style:parent-style-name="Table_20_Contents" style:list-style-name="L3"/>
    <style:style style:name="P22" style:family="paragraph" style:parent-style-name="Table_20_Contents" style:list-style-name="L3">
      <style:text-properties officeooo:rsid="005ad42d" officeooo:paragraph-rsid="0062238b"/>
    </style:style>
    <style:style style:name="P23" style:family="paragraph" style:parent-style-name="Table_20_Contents" style:list-style-name="L3">
      <style:text-properties officeooo:rsid="009a17ed" officeooo:paragraph-rsid="009a17ed"/>
    </style:style>
    <style:style style:name="P24" style:family="paragraph" style:parent-style-name="Table_20_Contents" style:list-style-name="L3">
      <style:paragraph-properties fo:text-align="left" style:justify-single-word="false"/>
      <style:text-properties officeooo:rsid="008faeaa" officeooo:paragraph-rsid="008faeaa"/>
    </style:style>
    <style:style style:name="P25" style:family="paragraph" style:parent-style-name="Table_20_Contents" style:list-style-name="L3">
      <style:paragraph-properties fo:text-align="left" style:justify-single-word="false"/>
      <style:text-properties officeooo:rsid="00969530" officeooo:paragraph-rsid="00969530"/>
    </style:style>
    <style:style style:name="P26" style:family="paragraph" style:parent-style-name="Table_20_Contents" style:list-style-name="L3">
      <style:paragraph-properties fo:text-align="left" style:justify-single-word="false"/>
      <style:text-properties officeooo:rsid="00bf95f3" officeooo:paragraph-rsid="00bf95f3"/>
    </style:style>
    <style:style style:name="P27" style:family="paragraph" style:parent-style-name="Table_20_Contents" style:list-style-name="L3">
      <style:paragraph-properties fo:text-align="left" style:justify-single-word="false"/>
      <style:text-properties officeooo:rsid="00c03e29" officeooo:paragraph-rsid="00c03e29"/>
    </style:style>
    <style:style style:name="P28" style:family="paragraph" style:parent-style-name="Table_20_Contents" style:list-style-name="L3">
      <style:paragraph-properties fo:text-align="left" style:justify-single-word="false"/>
      <style:text-properties officeooo:rsid="015391c0" officeooo:paragraph-rsid="015391c0"/>
    </style:style>
    <style:style style:name="P29" style:family="paragraph" style:parent-style-name="Standard" style:list-style-name="L3">
      <style:paragraph-properties fo:text-align="left" style:justify-single-word="false"/>
      <style:text-properties officeooo:paragraph-rsid="0062238b"/>
    </style:style>
    <style:style style:name="P30" style:family="paragraph" style:parent-style-name="Table_20_Contents" style:list-style-name="L3">
      <style:paragraph-properties fo:text-align="left" style:justify-single-word="false"/>
      <style:text-properties officeooo:paragraph-rsid="0062238b"/>
    </style:style>
    <style:style style:name="P31" style:family="paragraph" style:parent-style-name="Table_20_Contents" style:list-style-name="L3">
      <style:paragraph-properties fo:text-align="left" style:justify-single-word="false"/>
      <style:text-properties officeooo:rsid="01ff9730" officeooo:paragraph-rsid="01ff9730"/>
    </style:style>
    <style:style style:name="P32" style:family="paragraph" style:parent-style-name="Table_20_Contents" style:list-style-name="L4">
      <style:paragraph-properties fo:text-align="left" style:justify-single-word="false"/>
      <style:text-properties officeooo:rsid="004aec20" officeooo:paragraph-rsid="0062238b"/>
    </style:style>
    <style:style style:name="P33" style:family="paragraph" style:parent-style-name="Table_20_Contents" style:list-style-name="L4">
      <style:text-properties officeooo:rsid="0062238b" officeooo:paragraph-rsid="01d53049"/>
    </style:style>
    <style:style style:name="P34" style:family="paragraph" style:parent-style-name="Table_20_Contents" style:list-style-name="L4">
      <style:text-properties officeooo:rsid="00745fdd" officeooo:paragraph-rsid="00745fdd"/>
    </style:style>
    <style:style style:name="P35" style:family="paragraph" style:parent-style-name="Table_20_Contents">
      <style:paragraph-properties fo:text-align="left" style:justify-single-word="false"/>
      <style:text-properties officeooo:rsid="004aec20" officeooo:paragraph-rsid="0083e819"/>
    </style:style>
    <style:style style:name="P36" style:family="paragraph" style:parent-style-name="Table_20_Contents" style:list-style-name="L5">
      <style:paragraph-properties fo:text-align="left" style:justify-single-word="false"/>
      <style:text-properties officeooo:rsid="007b4cf9" officeooo:paragraph-rsid="007b4cf9"/>
    </style:style>
    <style:style style:name="P37" style:family="paragraph" style:parent-style-name="Table_20_Contents" style:list-style-name="L5">
      <style:paragraph-properties fo:text-align="left" style:justify-single-word="false"/>
      <style:text-properties officeooo:rsid="007ba948" officeooo:paragraph-rsid="007ba948"/>
    </style:style>
    <style:style style:name="P38" style:family="paragraph" style:parent-style-name="Table_20_Contents">
      <style:text-properties officeooo:paragraph-rsid="002132c2"/>
    </style:style>
    <style:style style:name="P39" style:family="paragraph" style:parent-style-name="Table_20_Contents">
      <style:text-properties officeooo:paragraph-rsid="00857969"/>
    </style:style>
    <style:style style:name="P40" style:family="paragraph" style:parent-style-name="Table_20_Contents">
      <style:text-properties officeooo:paragraph-rsid="0085c78c"/>
    </style:style>
    <style:style style:name="P41" style:family="paragraph" style:parent-style-name="Standard">
      <style:text-properties officeooo:rsid="001a8758"/>
    </style:style>
    <style:style style:name="P42" style:family="paragraph" style:parent-style-name="Table_20_Contents">
      <style:paragraph-properties fo:text-align="center" style:justify-single-word="false"/>
      <style:text-properties officeooo:rsid="003833ad" officeooo:paragraph-rsid="003833ad"/>
    </style:style>
    <style:style style:name="P43" style:family="paragraph" style:parent-style-name="Table_20_Contents">
      <style:paragraph-properties fo:text-align="center" style:justify-single-word="false"/>
      <style:text-properties officeooo:rsid="00229fa8" officeooo:paragraph-rsid="00229fa8"/>
    </style:style>
    <style:style style:name="P44" style:family="paragraph" style:parent-style-name="Table_20_Contents">
      <style:paragraph-properties fo:text-align="left" style:justify-single-word="false"/>
      <style:text-properties fo:color="#127622" loext:opacity="100%" style:font-name="Gabriela Nerd Font" officeooo:rsid="00229fa8" officeooo:paragraph-rsid="002a8bcd"/>
    </style:style>
    <style:style style:name="P45" style:family="paragraph" style:parent-style-name="Table_20_Contents">
      <style:paragraph-properties fo:text-align="left" style:justify-single-word="false"/>
      <style:text-properties officeooo:rsid="00229fa8" officeooo:paragraph-rsid="002a8bcd"/>
    </style:style>
    <style:style style:name="P46" style:family="paragraph" style:parent-style-name="Table_20_Contents">
      <style:paragraph-properties fo:text-align="left" style:justify-single-word="false"/>
      <style:text-properties officeooo:rsid="002a8bcd" officeooo:paragraph-rsid="002a8bcd"/>
    </style:style>
    <style:style style:name="P47" style:family="paragraph" style:parent-style-name="Table_20_Contents">
      <style:paragraph-properties fo:text-align="left" style:justify-single-word="false"/>
      <style:text-properties fo:color="#127622" loext:opacity="100%" style:font-name="Gabriela Nerd Font" officeooo:rsid="002a8bcd" officeooo:paragraph-rsid="002a8bcd"/>
    </style:style>
    <style:style style:name="P48" style:family="paragraph" style:parent-style-name="Table_20_Contents">
      <style:paragraph-properties fo:text-align="left" style:justify-single-word="false"/>
      <style:text-properties fo:color="#127622" loext:opacity="100%" style:font-name="Gabriela Nerd Font" officeooo:rsid="00229fa8" officeooo:paragraph-rsid="0026d4ff"/>
    </style:style>
    <style:style style:name="P49" style:family="paragraph" style:parent-style-name="Table_20_Contents">
      <style:paragraph-properties fo:text-align="left" style:justify-single-word="false"/>
      <style:text-properties officeooo:rsid="00229fa8" officeooo:paragraph-rsid="0026d4ff"/>
    </style:style>
    <style:style style:name="P50" style:family="paragraph" style:parent-style-name="Table_20_Contents">
      <style:paragraph-properties fo:text-align="left" style:justify-single-word="false"/>
      <style:text-properties officeooo:rsid="00229fa8" officeooo:paragraph-rsid="0026ecf0"/>
    </style:style>
    <style:style style:name="P51" style:family="paragraph" style:parent-style-name="Table_20_Contents">
      <style:paragraph-properties fo:text-align="left" style:justify-single-word="false"/>
      <style:text-properties officeooo:rsid="00229fa8" officeooo:paragraph-rsid="004476e1"/>
    </style:style>
    <style:style style:name="P52" style:family="paragraph" style:parent-style-name="Table_20_Contents">
      <style:paragraph-properties fo:text-align="left" style:justify-single-word="false"/>
      <style:text-properties officeooo:rsid="00229fa8" officeooo:paragraph-rsid="00272af7"/>
    </style:style>
    <style:style style:name="P53" style:family="paragraph" style:parent-style-name="Table_20_Contents">
      <style:text-properties officeooo:paragraph-rsid="008752b5"/>
    </style:style>
    <style:style style:name="P54" style:family="paragraph" style:parent-style-name="Table_20_Contents">
      <style:text-properties officeooo:paragraph-rsid="0035ef93"/>
    </style:style>
    <style:style style:name="P55" style:family="paragraph" style:parent-style-name="Table_20_Contents" style:list-style-name="L6">
      <style:text-properties officeooo:paragraph-rsid="01f5b8d7"/>
    </style:style>
    <style:style style:name="P56" style:family="paragraph" style:parent-style-name="Table_20_Contents" style:list-style-name="L6">
      <style:text-properties officeooo:rsid="0209f7cf" officeooo:paragraph-rsid="0209f7cf"/>
    </style:style>
    <style:style style:name="P57" style:family="paragraph" style:parent-style-name="Standard">
      <style:paragraph-properties fo:text-align="center" style:justify-single-word="false"/>
      <style:text-properties officeooo:paragraph-rsid="0035ef93"/>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ffd7d7"/>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2" style:family="paragraph" style:parent-style-name="Table_20_Contents">
      <style:paragraph-properties fo:text-align="center" style:justify-single-word="false"/>
      <style:text-properties officeooo:rsid="01f627d8" officeooo:paragraph-rsid="01f627d8"/>
    </style:style>
    <style:style style:name="P63" style:family="paragraph" style:parent-style-name="Table_20_Contents" style:list-style-name="L7">
      <style:text-properties officeooo:rsid="01f65077" officeooo:paragraph-rsid="01f65077"/>
    </style:style>
    <style:style style:name="P64" style:family="paragraph" style:parent-style-name="Table_20_Contents" style:list-style-name="L7">
      <style:text-properties fo:font-style="normal" officeooo:rsid="020f1902" officeooo:paragraph-rsid="020f1902" style:font-style-asian="normal" style:font-style-complex="normal"/>
    </style:style>
    <style:style style:name="P65" style:family="paragraph" style:parent-style-name="Table_20_Contents">
      <style:text-properties officeooo:rsid="01f65077" officeooo:paragraph-rsid="01f65077"/>
    </style:style>
    <style:style style:name="P66" style:family="paragraph" style:parent-style-name="Table_20_Contents">
      <style:text-properties officeooo:paragraph-rsid="0223e16e"/>
    </style:style>
    <style:style style:name="P67" style:family="paragraph" style:parent-style-name="Standard">
      <style:text-properties officeooo:rsid="001a8758" officeooo:paragraph-rsid="01f1708d"/>
    </style:style>
    <style:style style:name="P68" style:family="paragraph" style:parent-style-name="Table_20_Contents">
      <style:text-properties officeooo:paragraph-rsid="0035d38d"/>
    </style:style>
    <style:style style:name="P69" style:family="paragraph" style:parent-style-name="Standard">
      <style:paragraph-properties fo:text-align="center" style:justify-single-word="false"/>
      <style:text-properties officeooo:paragraph-rsid="006aca97"/>
    </style:style>
    <style:style style:name="T1" style:family="text">
      <style:text-properties fo:color="#127622" loext:opacity="100%" style:font-name="Gabriela Nerd Font"/>
    </style:style>
    <style:style style:name="T2" style:family="text">
      <style:text-properties style:use-window-font-color="true" loext:opacity="0%" style:font-name="Liberation Sans"/>
    </style:style>
    <style:style style:name="T3" style:family="text">
      <style:text-properties style:use-window-font-color="true" loext:opacity="0%" style:font-name="Liberation Sans" fo:font-size="10pt" officeooo:rsid="00835f4d" style:font-size-asian="10pt" style:font-size-complex="10pt"/>
    </style:style>
    <style:style style:name="T4" style:family="text">
      <style:text-properties style:use-window-font-color="true" loext:opacity="0%" style:font-name="Liberation Sans" fo:font-size="10pt" officeooo:rsid="003e40ba" style:font-size-asian="10pt" style:font-size-complex="10pt"/>
    </style:style>
    <style:style style:name="T5" style:family="text">
      <style:text-properties style:text-position="33% 80%" style:font-name="Liberation Sans"/>
    </style:style>
    <style:style style:name="T6" style:family="text">
      <style:text-properties style:font-name="Liberation Sans"/>
    </style:style>
    <style:style style:name="T7" style:family="text">
      <style:text-properties style:font-name="Liberation Sans" fo:background-color="#ffff00" loext:char-shading-value="0"/>
    </style:style>
    <style:style style:name="T8" style:family="text">
      <style:text-properties style:font-name="Liberation Sans" fo:font-style="italic"/>
    </style:style>
    <style:style style:name="T9" style:family="text">
      <style:text-properties style:font-name="Liberation Sans" fo:background-color="transparent" loext:char-shading-value="0"/>
    </style:style>
    <style:style style:name="T10" style:family="text">
      <style:text-properties style:font-name="Liberation Sans" officeooo:rsid="00ad9d96" fo:background-color="transparent" loext:char-shading-value="0"/>
    </style:style>
    <style:style style:name="T11" style:family="text">
      <style:text-properties fo:color="#127622" loext:opacity="100%"/>
    </style:style>
    <style:style style:name="T12" style:family="text">
      <style:text-properties style:font-name="Liberation Sans" fo:background-color="#ffd7d7" loext:char-shading-value="0"/>
    </style:style>
    <style:style style:name="T13" style:family="text">
      <style:text-properties officeooo:rsid="006e042b"/>
    </style:style>
    <style:style style:name="T14" style:family="text">
      <style:text-properties fo:color="#127622" loext:opacity="100%" style:font-name="Gabriela Nerd Font" officeooo:rsid="006e042b"/>
    </style:style>
    <style:style style:name="T15" style:family="text">
      <style:text-properties fo:color="#127622" loext:opacity="100%" style:font-name="Gabriela Nerd Font" officeooo:rsid="016c66b8"/>
    </style:style>
    <style:style style:name="T16" style:family="text">
      <style:text-properties fo:background-color="#ffff00" loext:char-shading-value="0"/>
    </style:style>
    <style:style style:name="T17" style:family="text">
      <style:text-properties fo:background-color="#ffbf00" loext:char-shading-value="0"/>
    </style:style>
    <style:style style:name="T18" style:family="text">
      <style:text-properties officeooo:rsid="011758e4"/>
    </style:style>
    <style:style style:name="T19" style:family="text">
      <style:text-properties officeooo:rsid="01f4fb63"/>
    </style:style>
    <style:style style:name="T20" style:family="text">
      <style:text-properties officeooo:rsid="01325c3b"/>
    </style:style>
    <style:style style:name="T21" style:family="text">
      <style:text-properties fo:color="#127622" loext:opacity="100%" style:font-name="Gabriela Nerd Font" officeooo:rsid="01f85691"/>
    </style:style>
    <style:style style:name="T22" style:family="text">
      <style:text-properties officeooo:rsid="0127d398"/>
    </style:style>
    <style:style style:name="T23" style:family="text">
      <style:text-properties officeooo:rsid="0129a39d"/>
    </style:style>
    <style:style style:name="T24" style:family="text">
      <style:text-properties fo:color="#127622" loext:opacity="100%" style:font-name="Gabriela Nerd Font" officeooo:rsid="0129a39d"/>
    </style:style>
    <style:style style:name="T25" style:family="text">
      <style:text-properties fo:color="#127622" loext:opacity="100%" style:font-name="Gabriela Nerd Font" officeooo:rsid="0141fe57"/>
    </style:style>
    <style:style style:name="T26" style:family="text">
      <style:text-properties officeooo:rsid="0107e990"/>
    </style:style>
    <style:style style:name="T27" style:family="text">
      <style:text-properties officeooo:rsid="0106dbae"/>
    </style:style>
    <style:style style:name="T28" style:family="text">
      <style:text-properties fo:font-style="italic" style:font-style-asian="italic" style:font-style-complex="italic"/>
    </style:style>
    <style:style style:name="T29" style:family="text">
      <style:text-properties officeooo:rsid="0103bb1e"/>
    </style:style>
    <style:style style:name="T30" style:family="text">
      <style:text-properties officeooo:rsid="01074391"/>
    </style:style>
    <style:style style:name="T31" style:family="text">
      <style:text-properties officeooo:rsid="01424702"/>
    </style:style>
    <style:style style:name="T32" style:family="text">
      <style:text-properties officeooo:rsid="010af213"/>
    </style:style>
    <style:style style:name="T33" style:family="text">
      <style:text-properties officeooo:rsid="012a0ee1"/>
    </style:style>
    <style:style style:name="T34" style:family="text">
      <style:text-properties officeooo:rsid="013eb53e"/>
    </style:style>
    <style:style style:name="T35" style:family="text">
      <style:text-properties fo:font-style="normal" style:font-style-asian="normal" style:font-style-complex="normal"/>
    </style:style>
    <style:style style:name="T36" style:family="text">
      <style:text-properties style:use-window-font-color="true" loext:opacity="0%"/>
    </style:style>
    <style:style style:name="T37" style:family="text">
      <style:text-properties style:use-window-font-color="true" loext:opacity="0%" fo:font-size="10pt" officeooo:rsid="00835f4d" style:font-size-asian="10pt" style:font-size-complex="10pt"/>
    </style:style>
    <style:style style:name="T38" style:family="text">
      <style:text-properties style:text-position="33% 80%"/>
    </style:style>
    <style:style style:name="T39" style:family="text">
      <style:text-properties fo:background-color="#fff5ce" loext:char-shading-value="0"/>
    </style:style>
    <style:style style:name="T40" style:family="text">
      <style:text-properties fo:background-color="#dee6ef" loext:char-shading-value="0"/>
    </style:style>
    <style:style style:name="T41" style:family="text">
      <style:text-properties fo:background-color="#ffaa95" loext:char-shading-value="0"/>
    </style:style>
    <style:style style:name="T42" style:family="text">
      <style:text-properties fo:font-style="italic"/>
    </style:style>
    <style:style style:name="T43" style:family="text">
      <style:text-properties fo:font-style="italic" fo:background-color="#ffff00" loext:char-shading-value="0"/>
    </style:style>
    <style:style style:name="T44" style:family="text">
      <style:text-properties officeooo:rsid="008a7f48"/>
    </style:style>
    <style:style style:name="T45" style:family="text">
      <style:text-properties style:text-underline-style="solid" style:text-underline-width="auto" style:text-underline-color="font-color" officeooo:rsid="008a7f48"/>
    </style:style>
    <style:style style:name="T46" style:family="text">
      <style:text-properties officeooo:rsid="008c54c8"/>
    </style:style>
    <style:style style:name="T47" style:family="text">
      <style:text-properties officeooo:rsid="00b8a1aa"/>
    </style:style>
    <style:style style:name="T48" style:family="text">
      <style:text-properties fo:color="#127622" loext:opacity="100%" style:font-name="Gabriela Nerd Font" officeooo:rsid="006614b8"/>
    </style:style>
    <style:style style:name="T49" style:family="text">
      <style:text-properties fo:color="#127622" loext:opacity="100%" style:font-name="Gabriela Nerd Font" officeooo:rsid="008cd184"/>
    </style:style>
    <style:style style:name="T50" style:family="text">
      <style:text-properties style:use-window-font-color="true" loext:opacity="0%" officeooo:rsid="006614b8"/>
    </style:style>
    <style:style style:name="T51" style:family="text">
      <style:text-properties style:use-window-font-color="true" loext:opacity="0%" style:text-position="super 58%" officeooo:rsid="008cd184"/>
    </style:style>
    <style:style style:name="T52" style:family="text">
      <style:text-properties style:use-window-font-color="true" loext:opacity="0%" officeooo:rsid="008cd184"/>
    </style:style>
    <style:style style:name="T53" style:family="text">
      <style:text-properties fo:color="#ff0000" loext:opacity="100%" officeooo:rsid="006614b8"/>
    </style:style>
    <style:style style:name="T54" style:family="text">
      <style:text-properties officeooo:rsid="008d9504"/>
    </style:style>
    <style:style style:name="T55" style:family="text">
      <style:text-properties officeooo:rsid="005c60cd"/>
    </style:style>
    <style:style style:name="T56" style:family="text">
      <style:text-properties officeooo:rsid="008e31f0"/>
    </style:style>
    <style:style style:name="T57" style:family="text">
      <style:text-properties officeooo:rsid="009a9dbc"/>
    </style:style>
    <style:style style:name="T58" style:family="text">
      <style:text-properties officeooo:rsid="01fb7f17"/>
    </style:style>
    <style:style style:name="T59" style:family="text">
      <style:text-properties officeooo:rsid="00c8b83a"/>
    </style:style>
    <style:style style:name="T60" style:family="text">
      <style:text-properties officeooo:rsid="0091a0a8"/>
    </style:style>
    <style:style style:name="T61" style:family="text">
      <style:text-properties officeooo:rsid="00bcf6a1"/>
    </style:style>
    <style:style style:name="T62" style:family="text">
      <style:text-properties officeooo:rsid="018bd568"/>
    </style:style>
    <style:style style:name="T63" style:family="text">
      <style:text-properties officeooo:rsid="00be6f47"/>
    </style:style>
    <style:style style:name="T64" style:family="text">
      <style:text-properties officeooo:rsid="00bf95f3"/>
    </style:style>
    <style:style style:name="T65" style:family="text">
      <style:text-properties officeooo:rsid="0144087f"/>
    </style:style>
    <style:style style:name="T66" style:family="text">
      <style:text-properties officeooo:rsid="01473ce5"/>
    </style:style>
    <style:style style:name="T67" style:family="text">
      <style:text-properties fo:color="#127622" loext:opacity="100%" style:font-name="Gabriela Nerd Font" officeooo:rsid="01473ce5"/>
    </style:style>
    <style:style style:name="T68" style:family="text">
      <style:text-properties officeooo:rsid="01459ad8"/>
    </style:style>
    <style:style style:name="T69" style:family="text">
      <style:text-properties officeooo:rsid="01fcbaff"/>
    </style:style>
    <style:style style:name="T70" style:family="text">
      <style:text-properties fo:color="#127622" loext:opacity="100%" style:font-name="Gabriela Nerd Font" officeooo:rsid="01459ad8"/>
    </style:style>
    <style:style style:name="T71" style:family="text">
      <style:text-properties officeooo:rsid="00c03e29"/>
    </style:style>
    <style:style style:name="T72" style:family="text">
      <style:text-properties officeooo:rsid="00ca5459"/>
    </style:style>
    <style:style style:name="T73" style:family="text">
      <style:text-properties officeooo:rsid="0148802f"/>
    </style:style>
    <style:style style:name="T74" style:family="text">
      <style:text-properties fo:color="#127622" loext:opacity="100%" style:font-name="Gabriela Nerd Font" officeooo:rsid="0148802f"/>
    </style:style>
    <style:style style:name="T75" style:family="text">
      <style:text-properties officeooo:rsid="00cb2338"/>
    </style:style>
    <style:style style:name="T76" style:family="text">
      <style:text-properties fo:font-style="normal" officeooo:rsid="00ca5459" style:font-style-asian="normal" style:font-style-complex="normal"/>
    </style:style>
    <style:style style:name="T77" style:family="text">
      <style:text-properties fo:font-style="italic" officeooo:rsid="00c400fd" style:font-style-asian="italic" style:font-style-complex="italic"/>
    </style:style>
    <style:style style:name="T78" style:family="text">
      <style:text-properties fo:font-style="normal" officeooo:rsid="00c400fd" style:font-style-asian="normal" style:font-style-complex="normal"/>
    </style:style>
    <style:style style:name="T79" style:family="text">
      <style:text-properties fo:font-style="normal" officeooo:rsid="00c21c9b" style:font-style-asian="normal" style:font-style-complex="normal"/>
    </style:style>
    <style:style style:name="T80" style:family="text">
      <style:text-properties style:use-window-font-color="true" loext:opacity="0%" fo:font-style="normal" style:font-style-asian="normal" style:font-style-complex="normal"/>
    </style:style>
    <style:style style:name="T81" style:family="text">
      <style:text-properties style:use-window-font-color="true" loext:opacity="0%" fo:font-style="normal" officeooo:rsid="01a2cf7c" style:font-style-asian="normal" style:font-style-complex="normal"/>
    </style:style>
    <style:style style:name="T82" style:family="text">
      <style:text-properties fo:color="#127622" loext:opacity="100%" style:font-name="Gabriela Nerd Font" fo:font-style="normal" style:font-style-asian="normal" style:font-style-complex="normal"/>
    </style:style>
    <style:style style:name="T83" style:family="text">
      <style:text-properties style:use-window-font-color="true" loext:opacity="0%" fo:font-size="10pt" officeooo:rsid="0083cbec" style:font-size-asian="10pt" style:font-size-complex="10pt"/>
    </style:style>
    <style:style style:name="T84" style:family="text">
      <style:text-properties fo:background-color="#ffd7d7" loext:char-shading-value="0"/>
    </style:style>
    <style:style style:name="T85" style:family="text">
      <style:text-properties fo:background-color="transparent" loext:char-shading-value="0"/>
    </style:style>
    <style:style style:name="T86" style:family="text">
      <style:text-properties officeooo:rsid="004d62bc"/>
    </style:style>
    <style:style style:name="T87" style:family="text">
      <style:text-properties fo:color="#127622" loext:opacity="100%" style:font-name="Gabriela Nerd Font" officeooo:rsid="004d62bc"/>
    </style:style>
    <style:style style:name="T88" style:family="text">
      <style:text-properties fo:color="#127622" loext:opacity="100%" style:font-name="Gabriela Nerd Font" officeooo:rsid="0178c666"/>
    </style:style>
    <style:style style:name="T89" style:family="text">
      <style:text-properties officeooo:rsid="01b82a6f"/>
    </style:style>
    <style:style style:name="T90" style:family="text">
      <style:text-properties officeooo:rsid="01ff9730"/>
    </style:style>
    <style:style style:name="T91" style:family="text">
      <style:text-properties fo:color="#127622" loext:opacity="100%" style:font-name="Gabriela Nerd Font" officeooo:rsid="0078d634"/>
    </style:style>
    <style:style style:name="T92" style:family="text">
      <style:text-properties style:text-position="33% 80%" fo:background-color="transparent" loext:char-shading-value="0"/>
    </style:style>
    <style:style style:name="T93" style:family="text">
      <style:text-properties fo:background-color="#ffb66c" loext:char-shading-value="0"/>
    </style:style>
    <style:style style:name="T94" style:family="text">
      <style:text-properties fo:font-style="italic" fo:background-color="#dee6ef" loext:char-shading-value="0"/>
    </style:style>
    <style:style style:name="T95" style:family="text">
      <style:text-properties fo:background-color="#ffdbb6" loext:char-shading-value="0"/>
    </style:style>
    <style:style style:name="T96" style:family="text">
      <style:text-properties fo:background-color="#b4c7dc" loext:char-shading-value="0"/>
    </style:style>
    <style:style style:name="T97" style:family="text">
      <style:text-properties officeooo:rsid="01f5b8d7"/>
    </style:style>
    <style:style style:name="T98" style:family="text">
      <style:text-properties officeooo:rsid="01bfe487"/>
    </style:style>
    <style:style style:name="T99" style:family="text">
      <style:text-properties officeooo:rsid="007385cc"/>
    </style:style>
    <style:style style:name="T100" style:family="text">
      <style:text-properties officeooo:rsid="017b540d"/>
    </style:style>
    <style:style style:name="T101" style:family="text">
      <style:text-properties style:use-window-font-color="true" loext:opacity="0%" style:font-name="Liberation Sans" fo:font-style="normal" officeooo:rsid="01f5b8d7" style:font-style-asian="normal" style:font-style-complex="normal"/>
    </style:style>
    <style:style style:name="T102" style:family="text">
      <style:text-properties officeooo:rsid="02032814"/>
    </style:style>
    <style:style style:name="T103" style:family="text">
      <style:text-properties officeooo:rsid="010915ff"/>
    </style:style>
    <style:style style:name="T104" style:family="text">
      <style:text-properties officeooo:rsid="017c2a4e"/>
    </style:style>
    <style:style style:name="T105" style:family="text">
      <style:text-properties officeooo:rsid="007644af"/>
    </style:style>
    <style:style style:name="T106" style:family="text">
      <style:text-properties fo:color="#127622" loext:opacity="100%" style:font-name="Gabriela Nerd Font" officeooo:rsid="007644af"/>
    </style:style>
    <style:style style:name="T107" style:family="text">
      <style:text-properties fo:color="#127622" loext:opacity="100%" style:font-name="Gabriela Nerd Font" officeooo:rsid="017c2a4e"/>
    </style:style>
    <style:style style:name="T108" style:family="text">
      <style:text-properties fo:color="#127622" loext:opacity="100%" style:font-name="Gabriela Nerd Font" officeooo:rsid="017d9c6f"/>
    </style:style>
    <style:style style:name="T109" style:family="text">
      <style:text-properties fo:color="#127622" loext:opacity="100%" style:font-name="Gabriela Nerd Font" officeooo:rsid="0083065d"/>
    </style:style>
    <style:style style:name="T110" style:family="text">
      <style:text-properties officeooo:rsid="007e4ea7"/>
    </style:style>
    <style:style style:name="T111" style:family="text">
      <style:text-properties officeooo:rsid="01dffb60"/>
    </style:style>
    <style:style style:name="T112" style:family="text">
      <style:text-properties fo:color="#127622" loext:opacity="100%" officeooo:rsid="01dffb60"/>
    </style:style>
    <style:style style:name="T113" style:family="text">
      <style:text-properties officeooo:rsid="007d53a0"/>
    </style:style>
    <style:style style:name="T114" style:family="text">
      <style:text-properties officeooo:rsid="007d76d0"/>
    </style:style>
    <style:style style:name="T115" style:family="text">
      <style:text-properties fo:color="#127622" loext:opacity="100%" officeooo:rsid="007d76d0"/>
    </style:style>
    <style:style style:name="T116" style:family="text">
      <style:text-properties officeooo:rsid="002132c2"/>
    </style:style>
    <style:style style:name="T117" style:family="text">
      <style:text-properties officeooo:rsid="01e25d01"/>
    </style:style>
    <style:style style:name="T118" style:family="text">
      <style:text-properties fo:color="#127622" loext:opacity="100%" officeooo:rsid="01e25d01"/>
    </style:style>
    <style:style style:name="T119" style:family="text">
      <style:text-properties fo:color="#127622" loext:opacity="100%" style:font-name="Gabriela Nerd Font" officeooo:rsid="00209d99"/>
    </style:style>
    <style:style style:name="T120" style:family="text">
      <style:text-properties style:use-window-font-color="true" loext:opacity="0%" fo:font-size="10pt" officeooo:rsid="00857969" style:font-size-asian="10pt" style:font-size-complex="10pt"/>
    </style:style>
    <style:style style:name="T121" style:family="text">
      <style:text-properties style:use-window-font-color="true" loext:opacity="0%" fo:font-size="10pt" officeooo:rsid="0085c78c" style:font-size-asian="10pt" style:font-size-complex="10pt"/>
    </style:style>
    <style:style style:name="T122" style:family="text">
      <style:text-properties officeooo:rsid="0024097c"/>
    </style:style>
    <style:style style:name="T123" style:family="text">
      <style:text-properties officeooo:rsid="0207549d"/>
    </style:style>
    <style:style style:name="T124" style:family="text">
      <style:text-properties officeooo:rsid="0208d6eb"/>
    </style:style>
    <style:style style:name="T125" style:family="text">
      <style:text-properties officeooo:rsid="0044fa0a"/>
    </style:style>
    <style:style style:name="T126" style:family="text">
      <style:text-properties fo:color="#127622" loext:opacity="100%" style:font-name="Gabriela Nerd Font" officeooo:rsid="00229fa8"/>
    </style:style>
    <style:style style:name="T127" style:family="text">
      <style:text-properties style:use-window-font-color="true" loext:opacity="0%" officeooo:rsid="0035d38d"/>
    </style:style>
    <style:style style:name="T128" style:family="text">
      <style:text-properties style:text-position="super 58%" officeooo:rsid="0036dc63"/>
    </style:style>
    <style:style style:name="T129" style:family="text">
      <style:text-properties officeooo:rsid="0209fdf6"/>
    </style:style>
    <style:style style:name="T130" style:family="text">
      <style:text-properties officeooo:rsid="020b923d"/>
    </style:style>
    <style:style style:name="T131" style:family="text">
      <style:text-properties officeooo:rsid="0055d9f6"/>
    </style:style>
    <style:style style:name="T132" style:family="text">
      <style:text-properties officeooo:rsid="00573a63"/>
    </style:style>
    <style:style style:name="T133" style:family="text">
      <style:text-properties officeooo:rsid="01e91f17"/>
    </style:style>
    <style:style style:name="T134" style:family="text">
      <style:text-properties fo:color="#127622" loext:opacity="100%" style:font-name="Gabriela Nerd Font" officeooo:rsid="01f0374b"/>
    </style:style>
    <style:style style:name="T135" style:family="text">
      <style:text-properties officeooo:rsid="01f0374b"/>
    </style:style>
    <style:style style:name="T136" style:family="text">
      <style:text-properties fo:color="#127622" loext:opacity="100%" style:font-name="Gabriela Nerd Font" officeooo:rsid="01ea11e5"/>
    </style:style>
    <style:style style:name="T137" style:family="text">
      <style:text-properties officeooo:rsid="01ea11e5"/>
    </style:style>
    <style:style style:name="T138" style:family="text">
      <style:text-properties officeooo:rsid="01ea9999"/>
    </style:style>
    <style:style style:name="T139"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42" style:family="text">
      <style:text-properties fo:color="#127622" loext:opacity="100%" style:font-name="Gabriela Nerd Font" officeooo:rsid="0214872d"/>
    </style:style>
    <style:style style:name="T143" style:family="text">
      <style:text-properties fo:background-color="#dedce6" loext:char-shading-value="0"/>
    </style:style>
    <style:style style:name="T144" style:family="text">
      <style:text-properties style:text-position="super 58%" officeooo:rsid="00508947" fo:background-color="transparent" loext:char-shading-value="0"/>
    </style:style>
    <style:style style:name="T145" style:family="text">
      <style:text-properties style:text-position="super 58%" officeooo:rsid="00519f1e"/>
    </style:style>
    <style:style style:name="T14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78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in" fo:min-width="0.8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2in" fo:min-width="0.78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38in" svg:stroke-color="#ff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78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18in" fo:min-width="0.78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in" fo:min-width="0.8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7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8in" fo:min-width="0.97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d7d7" draw:textarea-horizontal-align="justify" draw:textarea-vertical-align="middle" draw:auto-grow-height="false" fo:min-height="0.4618in" fo:min-width="0.8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0.77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7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64in" fo:min-width="0.9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ses is called and sent to Egypt</text:p>
      <table:table table:name="Table2" table:style-name="Table2">
        <table:table-column table:style-name="Table2.A"/>
        <table:table-row>
          <table:table-cell table:style-name="Table2.A1" office:value-type="string">
            <text:p text:style-name="P2"><text:span text:style-name="T1">Exodus 2:14-22</text:span><text:span text:style-name="T2"> </text:span><text:span text:style-name="T3">(</text:span><text:span text:style-name="T4">Moses’ age: 40-80</text:span><text:span text:style-name="T3">)</text:span><text:line-break/><text:span text:style-name="T5">14</text:span><text:span text:style-name="T6"> And he said, Who made thee a prince and a judge over us? intendest thou to kill me, as thou killedst the Egyptian? And Moses feared, and said, Surely this thing is known.<text:line-break/></text:span><text:span text:style-name="T5">15</text:span><text:span text:style-name="T6"> Now when Pharaoh heard this thing, he sought to slay Moses. But Moses fled from the face of Pharaoh, and dwelt in the </text:span><text:span text:style-name="T7">land of Midian</text:span><text:span text:style-name="T6">: and he sat down by a well.<text:line-break/></text:span><text:span text:style-name="T5">16</text:span><text:span text:style-name="T6"> Now the </text:span><text:span text:style-name="T7">priest</text:span><text:span text:style-name="T6"> of Midian had seven daughters: and they came and drew </text:span><text:span text:style-name="T8">water</text:span><text:span text:style-name="T6">, and filled the troughs to water their father's flock.<text:line-break/></text:span><text:span text:style-name="T5">17</text:span><text:span text:style-name="T6"> And </text:span><text:span text:style-name="T7">the shepherds came and drove them away</text:span><text:span text:style-name="T6">: but </text:span><text:span text:style-name="T7">Moses stood up and helped them</text:span><text:span text:style-name="T6">, and watered their flock.<text:line-break/></text:span><text:span text:style-name="T5">18</text:span><text:span text:style-name="T6"> And when they came to </text:span><text:span text:style-name="T9">Reuel</text:span><text:span text:style-name="T10"> </text:span><text:span text:style-name="T6">their father, he said, How </text:span><text:span text:style-name="T8">is it that</text:span><text:span text:style-name="T6"> ye are come so soon to day?<text:line-break/></text:span><text:span text:style-name="T5">19</text:span><text:span text:style-name="T6"> And they said, </text:span><text:span text:style-name="T7">An Egyptian delivered us out of the hand of the shepherds</text:span><text:span text:style-name="T6">, and also drew </text:span><text:span text:style-name="T8">water</text:span><text:span text:style-name="T6"> enough for us, and watered the flock. <text:line-break/></text:span><text:span text:style-name="T5">20</text:span><text:span text:style-name="T6"> And he said unto his daughters, And where </text:span><text:span text:style-name="T8">is</text:span><text:span text:style-name="T6"> he? why </text:span><text:span text:style-name="T8">is</text:span><text:span text:style-name="T6"> it </text:span><text:span text:style-name="T8">that</text:span><text:span text:style-name="T6"> ye have left the man? call him, that he may eat bread.<text:line-break/></text:span><text:span text:style-name="T5">21</text:span><text:span text:style-name="T6"> And Moses was content to dwell with the man: and he gave Moses </text:span><text:span text:style-name="T7">Zipporah</text:span><text:span text:style-name="T6"> his daughter.<text:line-break/></text:span><text:span text:style-name="T5">22</text:span><text:span text:style-name="T6"> And she bare </text:span><text:span text:style-name="T8">him</text:span><text:span text:style-name="T6"> a son, and he called his name </text:span><text:span text:style-name="T7">Gershom</text:span><text:span text:style-name="T6">: for he said, I have been a stranger in a strange land.</text:span></text:p>
          </table:table-cell>
        </table:table-row>
        <table:table-row>
          <table:table-cell table:style-name="Table2.A2" office:value-type="string">
            <text:p text:style-name="P3"><text:span text:style-name="T11">Exodus 4:18-20</text:span><text:span text:style-name="T2"> </text:span><text:span text:style-name="T3">(Moses’ age: 80)</text:span><text:line-break/><text:span text:style-name="T5">18</text:span><text:span text:style-name="T6"> And Moses went and returned to Jethro his father in law, and said unto him, Let me go, I pray thee, and return unto my brethren which </text:span><text:span text:style-name="T8">are</text:span><text:span text:style-name="T6"> in Egypt, and see whether they be yet alive. And Jethro said to Moses, Go in peace. <text:line-break/></text:span><text:span text:style-name="T5">19</text:span><text:span text:style-name="T6"> And the LORD said unto Moses in Midian, Go, return into Egypt: for all the men are dead which sought thy life. <text:line-break/></text:span><text:span text:style-name="T5">20</text:span><text:span text:style-name="T6"> And </text:span><text:span text:style-name="T7">Moses took his wife and his </text:span><text:span text:style-name="T12">sons</text:span><text:span text:style-name="T7">, and set them upon an ass, and he returned to the land of Egypt</text:span><text:span text:style-name="T6">: and Moses took the rod of God in his hand.</text:span></text:p>
          </table:table-cell>
        </table:table-row>
      </table:table>
      <text:list text:style-name="L1">
        <text:list-item>
          <text:p text:style-name="P4"><text:span text:style-name="T13">After Moses’ conversation with the angel of the LORD at the burning bush (</text:span><text:span text:style-name="T14">Exo</text:span><text:span text:style-name="T15">dus</text:span><text:span text:style-name="T14"> 3:1-4:17</text:span><text:span text:style-name="T13">), he </text:span>takes Zipporah, Gershom, and Eliezer to Egypt with him.</text:p>
        </text:list-item>
      </text:list>
      <text:p text:style-name="Standard"/>
      <text:p text:style-name="P5">Gershom &amp; Eliezer</text:p>
      <table:table table:name="Table8" table:style-name="Table8">
        <table:table-column table:style-name="Table8.A"/>
        <table:table-column table:style-name="Table8.B"/>
        <table:table-row>
          <table:table-cell table:style-name="Table8.A1" office:value-type="string">
            <text:p text:style-name="P6">Exodus 2:22</text:p>
            <text:p text:style-name="P7">And she bare him a son, and he called his name Gershom: for he said, <text:span text:style-name="T16">I </text:span><text:span text:style-name="T17">have been</text:span><text:span text:style-name="T16"> a stranger in a strange land.</text:span></text:p>
          </table:table-cell>
          <table:table-cell table:style-name="Table8.B1" office:value-type="string">
            <text:p text:style-name="P8">Exodus 18:3</text:p>
            <text:p text:style-name="P9">And her two sons; of which the name of the one was Gershom; for he said, <text:span text:style-name="T16">I </text:span><text:span text:style-name="T17">have been</text:span><text:span text:style-name="T16"> an alien in a strange land:</text:span></text:p>
          </table:table-cell>
        </table:table-row>
        <table:table-row>
          <table:table-cell table:style-name="Table8.A2" table:number-columns-spanned="2" office:value-type="string">
            <text:p text:style-name="P10">Exodus 18:4</text:p>
            <text:p text:style-name="P11">And the name of the other was Eliezer; for <text:span text:style-name="T16">the God of my father</text:span>, said he, <text:span text:style-name="T17">was</text:span><text:span text:style-name="T16"> mine help</text:span>, and <text:span text:style-name="T17">delivered</text:span><text:span text:style-name="T16"> me from the sword of Pharaoh:</text:span></text:p>
          </table:table-cell>
          <table:covered-table-cell/>
        </table:table-row>
      </table:table>
      <text:list text:style-name="L2">
        <text:list-item>
          <text:p text:style-name="P12">Since the Bible is <text:span text:style-name="T18">never</text:span> explicit about which of Moses’ first two sons was the firstborn, let’s look very carefully at what <text:span text:style-name="T19">is written</text:span><text:span text:style-name="T20">.</text:span></text:p>
        </text:list-item>
        <text:list-item>
          <text:p text:style-name="P13">We know from <text:span text:style-name="T1">Exodus 4:</text:span><text:span text:style-name="T21">19,</text:span><text:span text:style-name="T1">20</text:span> that both sons were born before Moses <text:span text:style-name="T22">was commanded </text:span>to return to Egypt when he was 80 years young <text:span text:style-name="T23">(</text:span><text:span text:style-name="T24">Acts 7:</text:span><text:span text:style-name="T25">23,</text:span><text:span text:style-name="T24">30</text:span><text:span text:style-name="T23">)</text:span>.</text:p>
        </text:list-item>
        <text:list-item>
          <text:p text:style-name="P14"><text:span text:style-name="T26">At first glance of </text:span>the wording in <text:span text:style-name="T1">Exodus 2:22</text:span> it <text:span text:style-name="T27">may</text:span> <text:span text:style-name="T28">look</text:span> like Gershom is the firstborn, but it’<text:span text:style-name="T29">s important to note that </text:span><text:span text:style-name="T30">based on the wording it does not </text:span>necessitate <text:span text:style-name="T29">that he was the firstborn. </text:span><text:span text:style-name="T31">Neither does the order of the verses necessitate that those events happened in exactly and only that order.</text:span></text:p>
        </text:list-item>
        <text:list-item>
          <text:p text:style-name="P15"><text:span text:style-name="T32">The Bible is not </text:span><text:span text:style-name="T33">always written</text:span><text:span text:style-name="T32"> in chronological order.</text:span></text:p>
        </text:list-item>
        <text:list-item>
          <text:p text:style-name="P16">The Bible does not always list sons in order of their birth so we can’t <text:span text:style-name="T34">assume that they are listed as such</text:span>.</text:p>
        </text:list-item>
      </text:list>
      <text:p text:style-name="P17"><text:span text:style-name="T35"/></text:p>
      <text:p text:style-name="P18">Why was only one son circumcised?</text:p>
      <table:table table:name="Table1" table:style-name="Table1">
        <table:table-column table:style-name="Table1.A"/>
        <text:soft-page-break/>
        <table:table-row>
          <table:table-cell table:style-name="Table1.A1" office:value-type="string">
            <text:p text:style-name="P19"><text:span text:style-name="T1">Exodus 4:24-26</text:span><text:span text:style-name="T36"> </text:span><text:span text:style-name="T37">(Moses’ age: 80)</text:span><text:line-break/><text:span text:style-name="T38">24</text:span> And it came to pass by the way in the inn, that the <text:span text:style-name="T39">LORD</text:span> met <text:span text:style-name="T40">him</text:span>, and sought to kill <text:span text:style-name="T41">him</text:span>. <text:line-break/><text:span text:style-name="T38">25</text:span> Then <text:span text:style-name="T16">Zipporah</text:span> took a sharp stone, and cut off the foreskin of her <text:span text:style-name="T41">son</text:span>, and cast <text:span text:style-name="T42">it</text:span> at <text:span text:style-name="T41">his</text:span> feet, and said, <text:span text:style-name="T16">Surely a bloody husband </text:span><text:span text:style-name="T43">art</text:span><text:span text:style-name="T16"> thou to me</text:span>. <text:line-break/><text:span text:style-name="T38">26</text:span> So <text:span text:style-name="T39">he</text:span> let <text:span text:style-name="T41">him</text:span> go: then she said, <text:span text:style-name="T16">A bloody husband </text:span><text:span text:style-name="T43">thou art</text:span>, because of the circumcision.</text:p>
          </table:table-cell>
        </table:table-row>
        <table:table-row>
          <table:table-cell table:style-name="Table1.A2" office:value-type="string">
            <text:list text:style-name="L3">
              <text:list-item>
                <text:p text:style-name="P20">On the way to Egypt, Moses, Zipporah, and their two sons stop at an inn. <text:span text:style-name="T44">Somehow the LORD makes it known that He intends to kill </text:span><text:span text:style-name="T45">one</text:span><text:span text:style-name="T44"> of Zipporah’s sons but He is merciful and only makes His intention known to them. </text:span><text:span text:style-name="T46">Zipporah’s response is to circumcise her son </text:span><text:span text:style-name="T47">and her words are very telling</text:span><text:span text:style-name="T46">. Therefore, we know that the issue at hand here is the covenant of circumcision:</text:span></text:p>
              </text:list-item>
              <text:list-item>
                <text:p text:style-name="P21"><text:span text:style-name="T48">Genesis 17:</text:span><text:span text:style-name="T49">9-</text:span><text:span text:style-name="T48">14</text:span><text:span text:style-name="T50"> “...</text:span><text:span text:style-name="T51">14</text:span><text:span text:style-name="T52"> </text:span><text:span text:style-name="T53">And the uncircumcised man child whose flesh of his foreskin is not circumcised, that soul shall be cut off from his people; he hath broken my covenant.</text:span><text:span text:style-name="T50">“</text:span></text:p>
              </text:list-item>
              <text:list-item>
                <text:p text:style-name="P22">Only one son is mentioned here <text:span text:style-name="T54">which tells us that</text:span> the other <text:span text:style-name="T54">son </text:span>was<text:span text:style-name="T55"> </text:span>already circumcised.</text:p>
              </text:list-item>
              <text:list-item>
                <text:p text:style-name="P22"><text:span text:style-name="T56">And that begs the question: Wh</text:span>y was the second son’s circumcision delayed so much that the LORD had to do this?</text:p>
              </text:list-item>
              <text:list-item>
                <text:p text:style-name="P23"><text:span text:style-name="T57">Note that </text:span><text:span text:style-name="T58">we don’t’ know which son was and which son wasn’t circumcised.</text:span></text:p>
              </text:list-item>
              <text:list-item>
                <text:p text:style-name="P24"><text:span text:style-name="T59">Another </text:span>clue is Zipporah’s own words: <text:span text:style-name="T60">she was clearly upset about having to do what she did. </text:span><text:span text:style-name="T61">Search the Bible for every </text:span><text:span text:style-name="T62">usage</text:span><text:span text:style-name="T61"> of the word “bloody” </text:span><text:span text:style-name="T63">(16 times </text:span><text:span text:style-name="T64">in </text:span><text:span text:style-name="T63">16 verses in 13 chapters in 6 books) </text:span><text:span text:style-name="T61">and every one of them has a negative connotation to it.</text:span></text:p>
              </text:list-item>
              <text:list-item>
                <text:p text:style-name="P25">Since Moses is not mentioned, I think that what we are being shown here is that Zipporah <text:span text:style-name="T64">rebelled against her husband and </text:span>resisted circumcising one of her sons and she had to learn how serious the covenant really was. <text:span text:style-name="T65">Moses, being the meek man that he was </text:span><text:span text:style-name="T66">(</text:span><text:span text:style-name="T67">Numbers 12:3</text:span><text:span text:style-name="T66">) </text:span><text:span text:style-name="T68">and </text:span><text:span text:style-name="T69">a</text:span><text:span text:style-name="T68"> figure of Christ (</text:span><text:span text:style-name="T70">Romans 5:14</text:span><text:span text:style-name="T68">), interceded on her behalf and </text:span><text:span text:style-name="T65">prayed </text:span><text:span text:style-name="T68">that </text:span><text:span text:style-name="T65">God would help her and that’s exactly what He did.</text:span></text:p>
                <text:list>
                  <text:list-item>
                    <text:p text:style-name="P26">Since one of the sons was circumcised it was most likely at Moses’ command; <text:span text:style-name="T71">him being </text:span>the one most familiar with Hebrew customs <text:span text:style-name="T72">(</text:span><text:span text:style-name="T73">we don’t see Jethro worshiping God until after the exodus in </text:span><text:span text:style-name="T74">Exodus 18:7-26</text:span><text:span text:style-name="T75">)</text:span><text:span text:style-name="T76">.</text:span></text:p>
                  </text:list-item>
                  <text:list-item>
                    <text:p text:style-name="P27">It is possible that Moses rebelled, but it seems unlikely because of what God <text:span text:style-name="T77">chose</text:span><text:span text:style-name="T78"> to</text:span><text:span text:style-name="T79"> tell us.</text:span></text:p>
                  </text:list-item>
                </text:list>
              </text:list-item>
              <text:list-item>
                <text:p text:style-name="P28"><text:span text:style-name="T80">At some point after leaving </text:span><text:span text:style-name="T81">to return to</text:span><text:span text:style-name="T80"> Egypt and before Moses and Jethro meet after the exodus from Egypt, Moses sends Zipporah and his sons back “home” to Midian. We know this because of </text:span><text:span text:style-name="T82">Exodus 18:2e</text:span><text:span text:style-name="T80">.</text:span></text:p>
              </text:list-item>
            </text:list>
          </table:table-cell>
        </table:table-row>
        <table:table-row>
          <table:table-cell table:style-name="Table1.A2" office:value-type="string">
            <text:p text:style-name="P19"><text:span text:style-name="T1">Exodus 10:1-2</text:span><text:span text:style-name="T36"> </text:span><text:span text:style-name="T37">(Moses’ age: 80-</text:span><text:span text:style-name="T83">120</text:span><text:span text:style-name="T37">)</text:span><text:line-break/><text:span text:style-name="T38">1</text:span> And the LORD said unto <text:span text:style-name="T39">Moses</text:span>, Go in unto Pharaoh: for I have hardened his heart, and the heart of his servants, that I might shew these my signs before him: <text:line-break/><text:span text:style-name="T38">2</text:span> And that <text:span text:style-name="T39">thou</text:span> mayest tell in the ears of <text:span text:style-name="T39">thy</text:span> <text:span text:style-name="T84">son</text:span>, and of <text:span text:style-name="T39">thy</text:span> <text:span text:style-name="T84">son</text:span>'s <text:span text:style-name="T85">son</text:span>, what things I have wrought in Egypt, and my signs which I have done among them; that ye may know how that I <text:span text:style-name="T42">am</text:span> the LORD.</text:p>
          </table:table-cell>
        </table:table-row>
        <table:table-row>
          <table:table-cell table:style-name="Table1.A2" office:value-type="string">
            <text:list text:continue-numbering="true" text:style-name="L3">
              <text:list-item>
                <text:p text:style-name="P29"><text:span text:style-name="T86">Son is singular here, but it appears at this point in time and up to at least </text:span><text:span text:style-name="T87">Exo</text:span><text:span text:style-name="T88">dus</text:span><text:span text:style-name="T87"> 18:1-17</text:span><text:span text:style-name="T86"> Moses has two sons </text:span><text:span text:style-name="T89">and they both had sons of their own.</text:span></text:p>
              </text:list-item>
              <text:list-item>
                <text:p text:style-name="P30"><text:span text:style-name="T90">We know from </text:span><text:span text:style-name="T1">1 Chronicles 23,24,26</text:span><text:span text:style-name="T90"> that both Gershom and Eliezer had descendants after them</text:span><text:span text:style-name="T89">.</text:span></text:p>
              </text:list-item>
              <text:list-item>
                <text:p text:style-name="P31">So, which son is the LORD referring to here?</text:p>
              </text:list-item>
            </text:list>
          </table:table-cell>
        </table:table-row>
        <table:table-row>
          <table:table-cell table:style-name="Table1.A2" office:value-type="string">
            <text:p text:style-name="P19"><text:span text:style-name="T1">Exodus 18:1-</text:span><text:span text:style-name="T91">6,</text:span><text:span text:style-name="T1">27</text:span><text:span text:style-name="T36"> </text:span><text:span text:style-name="T37">(Moses’ age: 80-</text:span><text:span text:style-name="T83">120</text:span><text:span text:style-name="T37">)</text:span><text:line-break/><text:span text:style-name="T38">1</text:span> When <text:span text:style-name="T16">Jethro</text:span>, the <text:span text:style-name="T16">priest of Midian</text:span>, <text:span text:style-name="T16">Moses' father in law</text:span>, heard of all that God had done for <text:span text:style-name="T40">Moses</text:span>, and for Israel his people, <text:span text:style-name="T42">and</text:span> that the LORD had brought Israel out of Egypt; <text:line-break/><text:span text:style-name="T38">2</text:span> Then Jethro, <text:span text:style-name="T40">Moses</text:span>' father in law, <text:span text:style-name="T16">took Zipporah, </text:span><text:span text:style-name="T40">Moses</text:span><text:span text:style-name="T16">' wife, </text:span><text:span text:style-name="T40">after he had sent her back</text:span><text:span text:style-name="T16">, <text:line-break/></text:span><text:span text:style-name="T92">3</text:span><text:span text:style-name="T85"> And </text:span><text:span text:style-name="T93">her two sons</text:span>; of which the name of the one <text:span text:style-name="T42">was</text:span> Gershom; for <text:span text:style-name="T40">he</text:span> said, <text:span text:style-name="T40">I</text:span> have been an alien in a strange land: <text:line-break/><text:span text:style-name="T38">4</text:span> And the name of the other <text:span text:style-name="T42">was</text:span> Eliezer; for the God of <text:span text:style-name="T40">my</text:span> father, <text:span text:style-name="T42">said </text:span><text:span text:style-name="T94">he</text:span><text:span text:style-name="T42">, was</text:span> <text:span text:style-name="T40">mine</text:span> help, and delivered <text:span text:style-name="T40">me</text:span> from the sword of Pharaoh: <text:line-break/><text:span text:style-name="T38">5</text:span> And <text:span text:style-name="T95">Jethro</text:span>, <text:span text:style-name="T96">Moses</text:span>' father in law, came with <text:span text:style-name="T95">his</text:span> sons and <text:span text:style-name="T95">his</text:span> wife unto <text:span text:style-name="T40">Moses</text:span> into the wilderness, where <text:span text:style-name="T40">he</text:span> encamped at the mount of God: <text:line-break/><text:span text:style-name="T38">6</text:span> And <text:span text:style-name="T95">he</text:span> said unto <text:span text:style-name="T40">Moses</text:span>, <text:span text:style-name="T16">I thy father in law Jethro am come unto </text:span><text:span text:style-name="T40">thee</text:span><text:span text:style-name="T16">, and </text:span><text:span text:style-name="T40">thy</text:span><text:span text:style-name="T16"> wife, and </text:span><text:span text:style-name="T93">her two sons</text:span><text:span text:style-name="T16"> with </text:span><text:soft-page-break/><text:span text:style-name="T16">her. </text:span><text:line-break/>...<text:line-break/><text:span text:style-name="T38">27</text:span> And <text:span text:style-name="T40">Moses</text:span> let <text:span text:style-name="T40">his</text:span> <text:span text:style-name="T95">father in law</text:span> depart; and <text:span text:style-name="T95">he</text:span> went <text:span text:style-name="T95">his</text:span> way into <text:span text:style-name="T95">his</text:span> own land.</text:p>
          </table:table-cell>
        </table:table-row>
        <table:table-row>
          <table:table-cell table:style-name="Table1.A2" office:value-type="string">
            <text:list text:style-name="L4">
              <text:list-item>
                <text:p text:style-name="P32">Somewhere between the time of leaving Midian (for Egypt) and before the end of the exodus from Egypt, Moses sends his wife and sons back “home” (to Jethro in Midian).</text:p>
              </text:list-item>
              <text:list-item>
                <text:p text:style-name="P33"><text:span text:style-name="T97">W</text:span>e’re told only that Jethro departed. <text:span text:style-name="T98">W</text:span><text:span text:style-name="T99">hat ab</text:span><text:span text:style-name="T100">o</text:span><text:span text:style-name="T99">ut Zipporah and her sons</text:span>? <text:span text:style-name="T97">If they didn’t leave then t</text:span><text:span text:style-name="T101">hat means that they stayed with Moses.</text:span></text:p>
              </text:list-item>
              <text:list-item>
                <text:p text:style-name="P34"><text:span text:style-name="T102">Only a</text:span>fter <text:span text:style-name="T102">six</text:span> generations <text:span text:style-name="T103">do we get </text:span><text:span text:style-name="T104">any </text:span><text:span text:style-name="T103">more </text:span><text:span text:style-name="T104">details</text:span><text:span text:style-name="T103"> a</text:span><text:span text:style-name="T104">b</text:span><text:span text:style-name="T103">out </text:span><text:span text:style-name="T102">what </text:span><text:span text:style-name="T103">Moses’ descendants </text:span><text:span text:style-name="T102">are up to</text:span><text:span text:style-name="T104"> </text:span><text:span text:style-name="T105">(</text:span><text:span text:style-name="T106">1 Ch</text:span><text:span text:style-name="T107">ronicles</text:span><text:span text:style-name="T106"> 26:25-28</text:span><text:span text:style-name="T105">).</text:span></text:p>
              </text:list-item>
            </text:list>
          </table:table-cell>
        </table:table-row>
        <table:table-row>
          <table:table-cell table:style-name="Table1.A2" office:value-type="string">
            <text:p text:style-name="P35"><text:span text:style-name="T1">Exodus 18:7-26</text:span><text:span text:style-name="T36"> </text:span><text:span text:style-name="T37">(Moses’ age: 80-</text:span><text:span text:style-name="T83">120</text:span><text:span text:style-name="T37">)</text:span><text:line-break/><text:span text:style-name="T38">7</text:span> And Moses went out to meet his father in law, and did obeisance, and kissed him; and they asked each other of <text:span text:style-name="T42">their</text:span> welfare; and they came into the tent.<text:line-break/><text:span text:style-name="T38">8</text:span> And Moses told his father in law all that the LORD had done unto Pharaoh and to the Egyptians for Israel's sake, <text:span text:style-name="T42">and</text:span> all the travail that had come upon them by the way, and <text:span text:style-name="T42">how</text:span> the LORD delivered them.<text:line-break/><text:span text:style-name="T38">9</text:span> And Jethro rejoiced for all the goodness which the LORD had done to Israel, whom he had delivered out of the hand of the Egyptians.<text:line-break/><text:span text:style-name="T38">10</text:span> And Jethro said, Blessed <text:span text:style-name="T42">be</text:span> the LORD, who hath delivered you out of the hand of the Egyptians, and out of the hand of Pharaoh, who hath delivered the people from under the hand of the Egyptians. <text:line-break/><text:span text:style-name="T38">11</text:span> <text:span text:style-name="T95">Now I know</text:span><text:span text:style-name="T16"> that the LORD </text:span><text:span text:style-name="T43">is</text:span><text:span text:style-name="T16"> greater than all gods: for in the thing wherein they dealt proudly </text:span><text:span text:style-name="T43">he was</text:span><text:span text:style-name="T16"> above them.</text:span><text:line-break/><text:span text:style-name="T38">12</text:span> And Jethro, Moses' father in law, took a burnt offering and sacrifices for God: and Aaron came, and all the elders of Israel, to eat bread with Moses' father in law before God. <text:line-break/><text:span text:style-name="T38">13</text:span> And it came to pass on the morrow, that Moses sat to judge the people: and the people stood by Moses from the morning unto the evening.<text:line-break/><text:span text:style-name="T38">14</text:span> And when Moses' father in law saw all that he did to the people, he said, What <text:span text:style-name="T42">is</text:span> this thing that thou doest to the people? why sittest thou thyself alone, and all the people stand by thee from morning unto even? <text:line-break/><text:span text:style-name="T38">15</text:span> And Moses said unto his father in law, Because the people come unto me to enquire of God:<text:line-break/><text:span text:style-name="T38">16</text:span> When they have a matter, they come unto me; and I judge between one and another, and I do make <text:span text:style-name="T42">them</text:span> know the statutes of God, and his laws.<text:line-break/><text:span text:style-name="T38">17</text:span> And Moses' father in law said unto him, The thing that thou doest <text:span text:style-name="T42">is</text:span> not good. <text:line-break/><text:span text:style-name="T38">18</text:span> Thou wilt surely wear away, both thou, and this people that <text:span text:style-name="T42">is</text:span> with thee: for this thing <text:span text:style-name="T42">is</text:span> too heavy for thee; thou art not able to perform it thyself alone.<text:line-break/><text:span text:style-name="T38">19</text:span> Hearken now unto my voice, I will give thee counsel, and God shall be with thee: Be thou for the people to God-ward, that thou mayest bring the causes unto God:<text:line-break/><text:span text:style-name="T38">20</text:span> And thou shalt teach them ordinances and laws, and shalt shew them the way wherein they must walk, and the work that they must do. <text:line-break/><text:span text:style-name="T38">21</text:span> Moreover thou shalt provide out of all the people able men, such as fear God, men of truth, hating covetousness; and place <text:span text:style-name="T42">such</text:span> over them, <text:span text:style-name="T42">to be</text:span> rulers of thousands, <text:span text:style-name="T42">and</text:span> rulers of hundreds, rulers of fifties, and rulers of tens:<text:line-break/><text:span text:style-name="T38">22</text:span> And let them judge the people at all seasons: and it shall be, <text:span text:style-name="T42">that</text:span> every great matter they shall bring unto thee, but every small matter they shall judge: so shall it be easier for thyself, and they shall bear <text:span text:style-name="T42">the burden</text:span> with thee.<text:line-break/><text:span text:style-name="T38">23</text:span> If thou shalt do this thing, and God command thee <text:span text:style-name="T42">so</text:span>, then thou shalt be able to endure, and all this people shall also go to their place in peace.<text:line-break/><text:span text:style-name="T38">24</text:span> So Moses hearkened to the voice of his father in law, and did all that he had said. <text:line-break/><text:span text:style-name="T38">25</text:span> And Moses chose able men out of all Israel, and made them heads over the people, rulers of thousands, rulers of hundreds, rulers of fifties, and rulers of tens.<text:line-break/><text:span text:style-name="T38">26</text:span> And they judged the people at all seasons: the hard causes they brought unto Moses, but every small matter they judged themselves.</text:p>
          </table:table-cell>
        </table:table-row>
        <table:table-row>
          <table:table-cell table:style-name="Table1.A2" office:value-type="string">
            <text:list text:style-name="L5">
              <text:list-item>
                <text:p text:style-name="P36">Jethro was previously described as a “priest of Midian” (<text:span text:style-name="T1">Exo</text:span><text:span text:style-name="T108">dus</text:span><text:span text:style-name="T1"> 2:16, </text:span><text:span text:style-name="T109">3:1</text:span>). <text:span text:style-name="T110">He likely did not worship the </text:span><text:soft-page-break/><text:span text:style-name="T110">God of Moses </text:span><text:span text:style-name="T111">before this</text:span><text:span text:style-name="T110"> point in time. </text:span><text:span text:style-name="T111">v</text:span><text:span text:style-name="T112">11</text:span><text:span text:style-name="T111"> (“Now I know…”) implies that Jethro either didn’t know or didn’t believe before this point.</text:span></text:p>
              </text:list-item>
              <text:list-item>
                <text:p text:style-name="P37">This text describes a turning point for Jethro (v<text:span text:style-name="T11">11</text:span>) <text:span text:style-name="T113">where he recognizes that the God of Moses is greater than “all gods”. </text:span><text:span text:style-name="T114">He then (v</text:span><text:span text:style-name="T115">12</text:span><text:span text:style-name="T114">) sacrifices to God and eats with Aaron and all the elders of Israel.</text:span></text:p>
              </text:list-item>
            </text:list>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38"><text:span text:style-name="T116">Moses knew that God would use him to deliver the Hebrews before he left Egypt </text:span><text:span text:style-name="T117">(v</text:span><text:span text:style-name="T118">25</text:span><text:span text:style-name="T117">).</text:span></text:p>
          </table:table-cell>
          <table:covered-table-cell/>
        </table:table-row>
        <table:table-row>
          <table:table-cell table:style-name="Table3.A2" office:value-type="string">
            <text:p text:style-name="P39"><text:span text:style-name="T1">Exodus 2:1,</text:span><text:span text:style-name="T119">2,11-</text:span><text:span text:style-name="T1">15</text:span><text:span text:style-name="T36"> </text:span><text:span text:style-name="T37">(Moses’ age: 0-</text:span><text:span text:style-name="T120">40</text:span><text:span text:style-name="T37">)</text:span><text:line-break/><text:span text:style-name="T38">1</text:span> And there went a man of the house of Levi, and took <text:span text:style-name="T42">to wife</text:span> a daughter of Levi. <text:line-break/><text:span text:style-name="T38">2</text:span> And the woman conceived, and bare a son: and when she saw him that he <text:span text:style-name="T42">was a</text:span> goodly <text:span text:style-name="T42">child</text:span>, she hid him three months.<text:line-break/><text:span text:style-name="T38">11</text:span> And it came to pass in those days, when <text:span text:style-name="T16">Moses was grown</text:span>, that <text:span text:style-name="T39">he went out unto his brethren</text:span>, and looked on their burdens: and he spied an Egyptian smiting an Hebrew, one of his brethren. <text:line-break/><text:span text:style-name="T38">12</text:span> And he looked this way and that way, and when he saw that <text:span text:style-name="T42">there was</text:span> no man, he slew the Egyptian, and hid him in the sand. <text:line-break/><text:span text:style-name="T38">13</text:span> And when he went out the second day, behold, two men of the Hebrews strove together: and he said to him that did the wrong, Wherefore smitest thou thy fellow? <text:line-break/><text:span text:style-name="T38">14</text:span> And he said, Who made thee a prince and a judge over us? intendest thou to kill me, as thou killedst the Egyptian? And Moses feared, and said, Surely this thing is known. <text:line-break/><text:span text:style-name="T38">15</text:span> Now when Pharaoh heard this thing, he sought to slay Moses. But Moses fled from the face of Pharaoh, and dwelt in the land of Midian: and he sat down by a well.</text:p>
          </table:table-cell>
          <table:table-cell table:style-name="Table3.B2" office:value-type="string">
            <text:p text:style-name="P40"><text:span text:style-name="T1">Acts 7:20-30</text:span><text:span text:style-name="T36"> </text:span><text:span text:style-name="T37">(Moses’ age: 0-</text:span><text:span text:style-name="T121">80</text:span><text:span text:style-name="T37">)</text:span><text:line-break/><text:span text:style-name="T38">20</text:span> In which time Moses was born, and was exceeding fair, and nourished up in his father's house three months: <text:line-break/><text:span text:style-name="T38">21</text:span> And when he was cast out, Pharaoh's daughter took him up, and nourished him for her own son. <text:line-break/><text:span text:style-name="T38">22</text:span> And Moses was learned in all the wisdom of the Egyptians, and was mighty in words and in deeds. <text:line-break/><text:span text:style-name="T38">23</text:span> And when <text:span text:style-name="T16">he was full forty years old</text:span>, <text:span text:style-name="T39">it came into his heart to visit his brethren</text:span> the children of Israel. <text:line-break/><text:span text:style-name="T38">24</text:span> And seeing one <text:span text:style-name="T42">of them</text:span> suffer wrong, he defended <text:span text:style-name="T42">him</text:span>, and avenged him that was oppressed, and smote the Egyptian: <text:line-break/><text:span text:style-name="T38">25</text:span> <text:span text:style-name="T40">For he supposed his brethren would have understood how that God by his hand would deliver them: but they understood not.</text:span><text:line-break/><text:span text:style-name="T38">26</text:span> And the next day he shewed himself unto them as they strove, and would have set them at one again, saying, Sirs, ye are brethren; why do ye wrong one to another? <text:line-break/><text:span text:style-name="T38">27</text:span> But he that did his neighbour wrong thrust him away, saying, Who made thee a ruler and a judge over us? <text:line-break/><text:span text:style-name="T38">28</text:span> Wilt thou kill me, as thou diddest the Egyptian yesterday? <text:line-break/><text:span text:style-name="T38">29</text:span> Then fled Moses at this saying, and was a stranger in the land of Madian, where he begat two sons. <text:line-break/><text:span text:style-name="T38">30</text:span> And <text:span text:style-name="T16">when forty years were expired</text:span>, there appeared to him in the wilderness of mount Sina an angel of the Lord in a flame of fire in a bush.</text:p>
          </table:table-cell>
        </table:table-row>
      </table:table>
      <text:p text:style-name="P41"/>
      <table:table table:name="Table4" table:style-name="Table4">
        <table:table-column table:style-name="Table4.A" table:number-columns-repeated="3"/>
        <table:table-row>
          <table:table-cell table:style-name="Table4.A1" table:number-columns-spanned="3" office:value-type="string">
            <text:p text:style-name="P42">Moses timeline</text:p>
          </table:table-cell>
          <table:covered-table-cell/>
          <table:covered-table-cell/>
        </table:table-row>
        <table:table-row>
          <table:table-cell table:style-name="Table4.A2" office:value-type="string">
            <text:p text:style-name="P43">Egypt</text:p>
          </table:table-cell>
          <table:table-cell table:style-name="Table4.A2" office:value-type="string">
            <text:p text:style-name="P43">Midian/<text:span text:style-name="T122">Madian→ </text:span><text:span text:style-name="T123">Pharoah</text:span></text:p>
          </table:table-cell>
          <table:table-cell table:style-name="Table4.C2" office:value-type="string">
            <text:p text:style-name="P43"><text:span text:style-name="T124">Pharoah → </text:span>Exodus→ Wilderness</text:p>
          </table:table-cell>
        </table:table-row>
        <table:table-row>
          <table:table-cell table:style-name="Table4.A2" office:value-type="string">
            <text:p text:style-name="P43"><text:span text:style-name="T125">1-40 (</text:span>40 years<text:span text:style-name="T125">)</text:span></text:p>
          </table:table-cell>
          <table:table-cell table:style-name="Table4.A2" office:value-type="string">
            <text:p text:style-name="P43"><text:span text:style-name="T125">40-80 (</text:span>40 years<text:span text:style-name="T125">)</text:span></text:p>
          </table:table-cell>
          <table:table-cell table:style-name="Table4.C2" office:value-type="string">
            <text:p text:style-name="P43"><text:span text:style-name="T125">80-120 (</text:span>40 years<text:span text:style-name="T125">)</text:span></text:p>
          </table:table-cell>
        </table:table-row>
        <table:table-row table:style-name="Table4.4">
          <table:table-cell table:style-name="Table4.A2" office:value-type="string">
            <text:p text:style-name="P44">Exodus 2:11</text:p>
            <text:p text:style-name="P45">And it came to pass in those days, when Moses was grown, that he went out unto his brethren, and looked on their burdens: and he spied an Egyptian smiting an Hebrew, one of his brethren.</text:p>
            <text:p text:style-name="P46"/>
            <text:p text:style-name="P47">Acts 7:23</text:p>
            <text:p text:style-name="P46"><text:soft-page-break/>And when he was full forty years old, it came into his heart to visit his brethren the children of Israel.</text:p>
          </table:table-cell>
          <table:table-cell table:style-name="Table4.A2" office:value-type="string">
            <text:p text:style-name="P48">Acts 7:29</text:p>
            <text:p text:style-name="P49">Then fled Moses at this saying, and was a stranger in the land of Madian, where he begat two sons.</text:p>
            <text:p text:style-name="P49"/>
            <text:p text:style-name="P48">Acts 7:30</text:p>
            <text:p text:style-name="P50">And when forty years were expired, there appeared to him in the wilderness of mount Sina an angel <text:soft-page-break/>of the Lord in a flame of fire in a bush.</text:p>
            <text:p text:style-name="P50"/>
            <text:p text:style-name="P48">Exodus 7:7</text:p>
            <text:p text:style-name="P51">And Moses was fourscore years old, and Aaron fourscore and three years old, when they spake unto Pharaoh.</text:p>
          </table:table-cell>
          <table:table-cell table:style-name="Table4.C2" office:value-type="string">
            <text:p text:style-name="P48">Deuteronomy 34:1</text:p>
            <text:p text:style-name="P52">And Moses went up from the plains of Moab unto the mountain of Nebo, to the top of Pisgah, that is over against Jericho. And the LORD shewed him all the land of Gilead, unto Dan,</text:p>
            <text:p text:style-name="P52"/>
            <text:p text:style-name="P48">Deuteronomy 34:7</text:p>
            <text:p text:style-name="P52"><text:soft-page-break/>And Moses was an hundred and twenty years old when he died: his eye was not dim, nor his natural force abated.</text:p>
          </table:table-cell>
        </table:table-row>
      </table:table>
      <text:p text:style-name="P41"/>
      <table:table table:name="Table5" table:style-name="Table5">
        <table:table-column table:style-name="Table5.A"/>
        <table:table-row>
          <table:table-cell table:style-name="Table5.A1" office:value-type="string">
            <text:p text:style-name="P53"><text:span text:style-name="T126">Numbers 12:1</text:span><text:span text:style-name="T127"> </text:span><text:span text:style-name="T37">(Moses’ age: 80-</text:span><text:span text:style-name="T83">120</text:span><text:span text:style-name="T37">)</text:span></text:p>
            <text:p text:style-name="P54">And Miriam and Aaron spake against Moses because of the Ethiopian<text:span text:style-name="T128">H3571</text:span> woman whom he had married: for he had married an Ethiopian woman.</text:p>
          </table:table-cell>
        </table:table-row>
        <table:table-row>
          <table:table-cell table:style-name="Table5.A2" office:value-type="string">
            <text:list text:style-name="L6">
              <text:list-item>
                <text:p text:style-name="P55"><text:span text:style-name="T97">Because of </text:span><text:span text:style-name="T126">Exodus 18:27</text:span><text:span text:style-name="T97">, if Zipporah didn’t die, then she is referred to here by a different name indicating a possible mixture of different peoples.</text:span></text:p>
                <text:list>
                  <text:list-item>
                    <text:p text:style-name="P56">We don’t know who the Kenites are descended from so either</text:p>
                    <text:list>
                      <text:list-item>
                        <text:p text:style-name="P56">The Kenites are descenda<text:span text:style-name="T129">nts</text:span> of Cush <text:span text:style-name="T130">or</text:span></text:p>
                      </text:list-item>
                      <text:list-item>
                        <text:p text:style-name="P56">One of Zippporah’s father’s married into the Cush family line</text:p>
                      </text:list-item>
                    </text:list>
                  </text:list-item>
                </text:list>
              </text:list-item>
              <text:list-item>
                <text:p text:style-name="P55"><text:span text:style-name="T131">The Ethiopian (Hebrew: Cushite) </text:span><text:span text:style-name="T97">woman.</text:span></text:p>
              </text:list-item>
              <text:list-item>
                <text:p text:style-name="P55"><text:span text:style-name="T97">Zippora</text:span><text:span text:style-name="T131">h </text:span><text:span text:style-name="T132">(Midianite/</text:span><text:span text:style-name="T133">Kenite </text:span><text:span text:style-name="T134">Numbers 10:29</text:span><text:span text:style-name="T135">, </text:span><text:span text:style-name="T136">Judges 1:16</text:span><text:span text:style-name="T137">, </text:span><text:span text:style-name="T136">4:11</text:span><text:span text:style-name="T137">, </text:span><text:span text:style-name="T136">1 Samuel 15:16</text:span><text:span text:style-name="T138">, </text:span><text:span text:style-name="T136">30:29</text:span><text:span text:style-name="T132">)</text:span></text:p>
              </text:list-item>
            </text:list>
          </table:table-cell>
        </table:table-row>
        <text:soft-page-break/>
        <table:table-row table:style-name="Table5.3">
          <table:table-cell table:style-name="Table5.A2" office:value-type="string">
            <text:p text:style-name="P57"><draw:g text:anchor-type="as-char" svg:y="-8.328in" draw:z-index="0" draw:name="Group object 4" draw:style-name="gr1"><draw:custom-shape draw:style-name="gr2" draw:text-style-name="P59" xml:id="id2" draw:id="id2" svg:width="1.0433in" svg:height="0.626in" svg:x="1.2957in" svg:y="0.9929in"><text:p text:style-name="P58"><text:span text:style-name="T139">Shem</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3" draw:text-style-name="P60" xml:id="id7" draw:id="id7" svg:width="1.1094in" svg:height="0.6197in" svg:x="0in" svg:y="2.6791in"><text:p text:style-name="P58"><text:span text:style-name="T141">Sarai/Sarah</text:span></text:p><text:p text:style-name="P58"><text:span text:style-name="T140">Gen 1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 draw:text-style-name="P59" xml:id="id1" draw:id="id1" svg:width="1.0425in" svg:height="0.5768in" svg:x="2.5154in" svg:y="0in"><text:p text:style-name="P58"><text:span text:style-name="T139">Noah</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3.0362in" svg:y1="0.5764in" svg:x2="1.8173in" svg:y2="0.9933in" draw:start-shape="id1" draw:start-glue-point="2" draw:end-shape="id2" draw:end-glue-point="0" svg:d="M7712-19689c0 794-3096 265-3096 1059" svg:viewBox="0 0 3097 1060"><text:p/></draw:connector><draw:custom-shape draw:style-name="gr6" draw:text-style-name="P59" xml:id="id3" draw:id="id3" svg:width="1.0425in" svg:height="0.6252in" svg:x="2.5173in" svg:y="0.9937in"><text:p text:style-name="P58"><text:span text:style-name="T139">Ham</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4" draw:id="id4" svg:width="1.0425in" svg:height="0.6252in" svg:x="3.6984in" svg:y="0.9945in"><text:p text:style-name="P58"><text:span text:style-name="T139">Japheth</text:span></text:p><text:p text:style-name="P58"><text:span text:style-name="T140">Gen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3.0362in" svg:y1="0.5764in" svg:x2="3.0382in" svg:y2="0.9941in" draw:start-shape="id1" draw:start-glue-point="2" draw:end-shape="id3" draw:end-glue-point="0" svg:d="M7712-19689c0 796 5 267 5 1061" svg:viewBox="0 0 7 1062"><text:p/></draw:connector><draw:connector draw:style-name="gr5" draw:text-style-name="P61" draw:type="curve" svg:x1="3.0362in" svg:y1="0.5764in" svg:x2="4.2193in" svg:y2="0.9945in" draw:start-shape="id1" draw:start-glue-point="2" draw:end-shape="id4" draw:end-glue-point="0" svg:d="M7712-19689c0 800 3005 269 3005 1062" svg:viewBox="0 0 3007 1064"><text:p/></draw:connector><draw:custom-shape draw:style-name="gr6" draw:text-style-name="P59" xml:id="id5" draw:id="id5" svg:width="1.0425in" svg:height="0.6252in" svg:x="2.5173in" svg:y="1.8209in"><text:p text:style-name="P58"><text:span text:style-name="T139">Cush</text:span></text:p><text:p text:style-name="P58"><text:span text:style-name="T140">Gen 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3.0382in" svg:y1="1.6189in" svg:x2="3.0382in" svg:y2="1.8209in" draw:start-shape="id3" draw:start-glue-point="2" draw:end-shape="id5" draw:end-glue-point="0" svg:d="M7717-17041v513" svg:viewBox="0 0 2 515"><text:p/></draw:connector><draw:custom-shape draw:style-name="gr7" draw:text-style-name="P59" xml:id="id6" draw:id="id6" svg:width="1.0425in" svg:height="0.6205in" svg:x="1.2929in" svg:y="2.678in"><text:p text:style-name="P58"><text:span text:style-name="T139">Abram/Abraham</text:span></text:p><text:p text:style-name="P58"><text:span text:style-name="T140">Gen 1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1.8173in" svg:y1="1.6189in" svg:x2="1.8138in" svg:y2="2.678in" draw:start-shape="id2" draw:start-glue-point="2" draw:end-shape="id6" draw:end-glue-point="0" svg:d="M4616-17041c0 2016-9 672-9 2690" svg:viewBox="0 0 11 2692"><text:p/></draw:connector><draw:custom-shape draw:style-name="gr8" draw:text-style-name="P60" xml:id="id8" draw:id="id8" svg:width="1.1098in" svg:height="0.6197in" svg:x="2.5063in" svg:y="2.6791in"><text:p text:style-name="P58"><text:span text:style-name="T141">Keturah</text:span></text:p><text:p text:style-name="P58"><text:span text:style-name="T140">Gen 2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xml:id="id9" draw:id="id9" draw:type="curve" svg:x1="1.2929in" svg:y1="2.9874in" svg:x2="1.1091in" svg:y2="2.9886in" draw:start-shape="id6" draw:start-glue-point="3" draw:end-shape="id7" draw:end-glue-point="1" svg:d="M3284-13565c-351 0-118 3-467 3" svg:viewBox="0 0 469 5"><text:p/></draw:connector><draw:connector draw:style-name="gr5" draw:text-style-name="P61" xml:id="id11" draw:id="id11" draw:type="curve" svg:x1="2.3354in" svg:y1="2.9874in" svg:x2="2.5063in" svg:y2="2.9886in" draw:start-shape="id6" draw:start-glue-point="1" draw:end-shape="id8" draw:end-glue-point="3" svg:d="M5932-13565c325 0 109 3 434 3" svg:viewBox="0 0 436 5"><text:p/></draw:connector><draw:custom-shape draw:style-name="gr6" draw:text-style-name="P59" xml:id="id10" draw:id="id10" svg:width="1.0425in" svg:height="0.6252in" svg:x="0.6799in" svg:y="3.4492in"><text:p text:style-name="P58"><text:span text:style-name="T139">Isaac</text:span></text:p><text:p text:style-name="P58"><text:span text:style-name="T140">Gen 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59" xml:id="id12" draw:id="id12" svg:width="1.0425in" svg:height="0.626in" svg:x="1.902in" svg:y="3.4398in"><text:p text:style-name="P58"><text:span text:style-name="T139">Midian</text:span></text:p><text:p text:style-name="P58"><text:span text:style-name="T140">Gen 25: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1.2008in" svg:y1="2.9882in" svg:x2="1.2008in" svg:y2="3.4496in" draw:start-shape="id9" draw:start-glue-point="0" draw:end-shape="id10" draw:end-glue-point="0" svg:d="M3050-13563v1172" svg:viewBox="0 0 2 1173"><text:p/></draw:connector><draw:connector draw:style-name="gr5" draw:text-style-name="P61" draw:type="curve" svg:x1="2.4209in" svg:y1="2.9882in" svg:x2="2.4228in" svg:y2="3.4398in" draw:start-shape="id11" draw:start-glue-point="0" draw:end-shape="id12" draw:end-glue-point="0" svg:d="M6149-13563c0 874 5 300 5 1147" svg:viewBox="0 0 7 1148"><text:p/></draw:connector></draw:g></text:p>
          </table:table-cell>
        </table:table-row>
      </table:table>
      <text:p text:style-name="P41"/>
      <table:table table:name="Table10" table:style-name="Table10">
        <table:table-column table:style-name="Table10.A"/>
        <table:table-column table:style-name="Table10.B"/>
        <table:table-row>
          <table:table-cell table:style-name="Table10.A1" office:value-type="string">
            <text:p text:style-name="P62">Who were the Kenites descended from?</text:p>
          </table:table-cell>
          <table:table-cell table:style-name="Table10.B1" office:value-type="string">
            <text:p text:style-name="P62"/>
          </table:table-cell>
        </table:table-row>
        <table:table-row>
          <table:table-cell table:style-name="Table10.A2" office:value-type="string">
            <text:list text:style-name="L7">
              <text:list-item>
                <text:p text:style-name="P63">Kenites (H7017)</text:p>
              </text:list-item>
              <text:list-item>
                <text:p text:style-name="P64">The first mention of the Kenites is when the LORD gives their land to Abram’s seed.</text:p>
              </text:list-item>
            </text:list>
          </table:table-cell>
          <table:table-cell table:style-name="Table10.B2" office:value-type="string">
            <text:p text:style-name="P65"/>
          </table:table-cell>
        </table:table-row>
        <table:table-row table:style-name="Table10.3">
          <table:table-cell table:style-name="Table10.A2" office:value-type="string">
            <text:p text:style-name="P66"><text:span text:style-name="T126">Genesis 15:18-</text:span><text:span text:style-name="T142">21</text:span><text:line-break/><text:span text:style-name="T38">18</text:span> In the same day the LORD made a covenant with Abram, saying, Unto thy seed have I given this land, from the river of Egypt unto the great river, the river Euphrates:<text:line-break/><text:span text:style-name="T38">19</text:span> The <text:span text:style-name="T39">Kenites</text:span>, and the <text:span text:style-name="T16">Kenizzites</text:span>, and the <text:span text:style-name="T16">Kadmonites</text:span>,<text:line-break/><text:soft-page-break/><text:span text:style-name="T38">20</text:span> And the <text:span text:style-name="T16">Hittites</text:span>, and the <text:span text:style-name="T16">Perizzites</text:span>, and the <text:span text:style-name="T16">Rephaims</text:span>,<text:line-break/><text:span text:style-name="T38">21</text:span> And the <text:span text:style-name="T16">Amorites</text:span>, and the <text:span text:style-name="T16">Canaanites</text:span>, and the <text:span text:style-name="T16">Girgashites</text:span>, and the <text:span text:style-name="T16">Jebusites</text:span>.</text:p>
          </table:table-cell>
          <table:table-cell table:style-name="Table10.B2" office:value-type="string">
            <text:p text:style-name="P66"/>
          </table:table-cell>
        </table:table-row>
      </table:table>
      <text:p text:style-name="P41"/>
      <text:p text:style-name="P67"/>
      <table:table table:name="Table6" table:style-name="Table6">
        <table:table-column table:style-name="Table6.A"/>
        <table:table-row>
          <table:table-cell table:style-name="Table6.A1" office:value-type="string">
            <text:p text:style-name="P68"><text:span text:style-name="T126">1 Chronicles 23:12-17</text:span><text:line-break/><text:span text:style-name="T38">12</text:span> The sons of <text:span text:style-name="T16">Kohath</text:span>; <text:span text:style-name="T16">Amram</text:span>, Izhar, Hebron, and Uzziel, four. <text:line-break/><text:span text:style-name="T38">13</text:span> The sons of <text:span text:style-name="T16">Amram</text:span>; Aaron and <text:span text:style-name="T16">Moses</text:span>: and Aaron was separated, that he should sanctify the most holy things, he and his sons for ever, to burn incense before the LORD, to minister unto him, and to bless in his name for ever. <text:line-break/><text:span text:style-name="T38">14</text:span> Now <text:span text:style-name="T42">concerning</text:span> Moses the man of God, his sons were named of the tribe of Levi. <text:line-break/><text:span text:style-name="T38">15</text:span> The sons of <text:span text:style-name="T16">Moses</text:span> <text:span text:style-name="T42">were</text:span>, <text:span text:style-name="T95">Gershom</text:span>, and <text:span text:style-name="T143">Eliezer</text:span>. <text:line-break/><text:span text:style-name="T38">16</text:span> Of the sons of <text:span text:style-name="T95">Gershom</text:span>, <text:span text:style-name="T95">Shebuel</text:span><text:span text:style-name="T144">H7619</text:span> <text:span text:style-name="T42">was</text:span> the chief. <text:line-break/><text:span text:style-name="T38">17</text:span> And the sons of <text:span text:style-name="T143">Eliezer</text:span> <text:span text:style-name="T42">were</text:span>, <text:span text:style-name="T143">Rehabiah</text:span> the chief. And Eliezer had none other sons; but the sons of <text:span text:style-name="T143">Rehabiah</text:span> were very many.</text:p>
          </table:table-cell>
        </table:table-row>
        <table:table-row>
          <table:table-cell table:style-name="Table6.A2" office:value-type="string">
            <text:p text:style-name="P68"><text:span text:style-name="T126">1 Chronicles 24:20-21</text:span><text:line-break/><text:span text:style-name="T38">20</text:span> And the rest of the sons of Levi <text:span text:style-name="T42">were these</text:span>: Of the sons of <text:span text:style-name="T16">Amram</text:span>; <text:span text:style-name="T95">Shubael</text:span><text:span text:style-name="T145">H7619</text:span>: of the sons of <text:span text:style-name="T95">Shubael</text:span>; <text:span text:style-name="T95">Jehdeiah</text:span>. <text:line-break/><text:span text:style-name="T38">21</text:span> Concerning <text:span text:style-name="T143">Rehabiah</text:span>: of the sons of <text:span text:style-name="T143">Rehabiah</text:span>, the first <text:span text:style-name="T42">was</text:span> <text:span text:style-name="T143">Isshiah</text:span>.</text:p>
          </table:table-cell>
        </table:table-row>
        <table:table-row>
          <table:table-cell table:style-name="Table6.A2" office:value-type="string">
            <text:p text:style-name="P68"><text:span text:style-name="T126">1 Chronicles 26:23-28</text:span><text:line-break/><text:span text:style-name="T38">23</text:span> Of the <text:span text:style-name="T16">Amramites</text:span>, <text:span text:style-name="T42">and</text:span> the Izharites, the Hebronites, <text:span text:style-name="T42">and</text:span> the Uzzielites: <text:line-break/><text:span text:style-name="T38">24</text:span> And <text:span text:style-name="T95">Shebuel</text:span> the son of <text:span text:style-name="T95">Gershom</text:span>, the son of <text:span text:style-name="T16">Moses</text:span>, <text:span text:style-name="T42">was</text:span> ruler of the treasures. <text:line-break/><text:span text:style-name="T38">25</text:span> And his brethren by <text:span text:style-name="T143">Eliezer</text:span>; <text:span text:style-name="T143">Rehabiah</text:span> his son, and <text:span text:style-name="T143">Jeshaiah</text:span> his son, and <text:span text:style-name="T143">Joram</text:span> his son, and <text:span text:style-name="T143">Zichri</text:span> his son, and <text:span text:style-name="T143">Shelomith</text:span> his son. <text:line-break/><text:span text:style-name="T38">26</text:span> Which <text:span text:style-name="T143">Shelomith</text:span> and his brethren <text:span text:style-name="T42">were</text:span> over all the treasures of the dedicated things, which David the king, and the chief fathers, the captains over thousands and hundreds, and the captains of the host, had dedicated. <text:line-break/><text:span text:style-name="T38">27</text:span> Out of the spoils won in battles did they dedicate to maintain the house of the LORD. <text:line-break/><text:span text:style-name="T38">28</text:span> And all that Samuel the seer, and Saul the son of Kish, and Abner the son of Ner, and Joab the son of Zeruiah, had dedicated; <text:span text:style-name="T42">and</text:span> whosoever had dedicated <text:span text:style-name="T42">any thing, it was</text:span> under the hand of <text:span text:style-name="T143">Shelomith</text:span>, and of his brethren.</text:p>
          </table:table-cell>
        </table:table-row>
      </table:table>
      <text:p text:style-name="P41"/>
      <table:table table:name="Table7" table:style-name="Table7">
        <table:table-column table:style-name="Table7.A"/>
        <text:soft-page-break/>
        <table:table-row>
          <table:table-cell table:style-name="Table7.A1" office:value-type="string">
            <text:p text:style-name="P69"><draw:g text:anchor-type="as-char" draw:z-index="1" draw:name="Group object 1" draw:style-name="gr10"><draw:custom-shape draw:style-name="gr9" draw:text-style-name="P59" xml:id="id14" draw:id="id14" svg:width="1.0425in" svg:height="0.626in" svg:x="1.2528in" svg:y="0.9929in"><text:p text:style-name="P58"><text:span text:style-name="T139">Gershon</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4" draw:text-style-name="P59" xml:id="id13" draw:id="id13" svg:width="1.0425in" svg:height="0.5768in" svg:x="2.472in" svg:y="0in"><text:p text:style-name="P58"><text:span text:style-name="T139">Levi</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29in" svg:y1="0.5764in" svg:x2="1.7736in" svg:y2="0.9933in" draw:start-shape="id13" draw:start-glue-point="2" draw:end-shape="id14" draw:end-glue-point="0" svg:d="M7602-10453c0 794-3097 265-3097 1059" svg:viewBox="0 0 3099 1060"><text:p/></draw:connector><draw:custom-shape draw:style-name="gr6" draw:text-style-name="P59" xml:id="id15" draw:id="id15" svg:width="1.0425in" svg:height="0.6252in" svg:x="2.4736in" svg:y="0.9937in"><text:p text:style-name="P58"><text:span text:style-name="T139">Kohath</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16" draw:id="id16" svg:width="1.0425in" svg:height="0.6252in" svg:x="0in" svg:y="1in"><text:p text:style-name="P58"><text:span text:style-name="T139">Merari</text:span></text:p><text:p text:style-name="P58"><text:span text:style-name="T140">1Ch 23: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29in" svg:y1="0.5764in" svg:x2="2.9945in" svg:y2="0.9937in" draw:start-shape="id13" draw:start-glue-point="2" draw:end-shape="id15" draw:end-glue-point="0" svg:d="M7602-10453c0 796 4 267 4 1060" svg:viewBox="0 0 5 1062"><text:p/></draw:connector><draw:connector draw:style-name="gr5" draw:text-style-name="P61" draw:type="curve" svg:x1="2.9929in" svg:y1="0.5764in" svg:x2="0.5209in" svg:y2="1in" draw:start-shape="id13" draw:start-glue-point="2" draw:end-shape="id16" draw:end-glue-point="0" svg:d="M7602-10453c0 810-6279 272-6279 1076" svg:viewBox="0 0 6281 1078"><text:p/></draw:connector><draw:custom-shape draw:style-name="gr6" draw:text-style-name="P59" xml:id="id17" draw:id="id17" svg:width="1.0425in" svg:height="0.6252in" svg:x="2.4744in" svg:y="1.8209in"><text:p text:style-name="P58"><text:span text:style-name="T139">Amram</text:span></text:p><text:p text:style-name="P58"><text:span text:style-name="T140">1Ch 23: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45in" svg:y1="1.6189in" svg:x2="2.9953in" svg:y2="1.8209in" draw:start-shape="id15" draw:start-glue-point="2" draw:end-shape="id17" draw:end-glue-point="0" svg:d="M7606-7805c0 386 2 130 2 513" svg:viewBox="0 0 4 515"><text:p/></draw:connector><draw:custom-shape draw:style-name="gr11" draw:text-style-name="P60" xml:id="id22" draw:id="id22" svg:width="1.2343in" svg:height="0.6205in" svg:x="1.0327in" svg:y="2.7307in"><text:p text:style-name="P58"><text:span text:style-name="T141">Zipporah</text:span></text:p><text:p text:style-name="P58"><text:span text:style-name="T140">Exo 2:21, 1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1" draw:id="id21" svg:width="1.0425in" svg:height="0.6252in" svg:x="2.4744in" svg:y="2.7264in"><text:p text:style-name="P58"><text:span text:style-name="T139">Moses</text:span></text:p><text:p text:style-name="P58"><text:span text:style-name="T140">1Ch 23: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0" draw:id="id20" svg:width="1.0425in" svg:height="0.6252in" svg:x="3.6555in" svg:y="2.7272in"><text:p text:style-name="P58"><text:span text:style-name="T139">Aaron</text:span></text:p><text:p text:style-name="P58"><text:span text:style-name="T140">1Ch 23: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2" draw:text-style-name="P60" xml:id="id18" draw:id="id18" svg:width="1.1094in" svg:height="0.6205in" svg:x="4.0327in" svg:y="0.9972in"><text:p text:style-name="P58"><text:span text:style-name="T141">Jochebed</text:span></text:p><text:p text:style-name="P58"><text:span text:style-name="T140">Exo 6:20</text:span></text:p><text:p text:style-name="P58"><text:span text:style-name="T140">Num 26:5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xml:id="id19" draw:id="id19" draw:type="curve" svg:x1="4.0327in" svg:y1="1.3071in" svg:x2="3.5165in" svg:y2="2.1335in" draw:start-shape="id18" draw:start-glue-point="3" draw:end-shape="id17" draw:end-glue-point="1" svg:d="M10243-8597c-984 0-330 2099-1311 2099" svg:viewBox="0 0 1312 2101"><text:p/></draw:connector><draw:connector draw:style-name="gr5" draw:text-style-name="P61" draw:type="curve" svg:x1="3.7736in" svg:y1="1.7201in" svg:x2="4.1764in" svg:y2="2.7272in" draw:start-shape="id19" draw:start-glue-point="0" draw:end-shape="id20" draw:end-glue-point="0" svg:d="M9585-7548c-1753 0-1461 907-767 1267 693 360 1790 173 1790 1291" svg:viewBox="0 0 2335 2559"><text:p/></draw:connector><draw:connector draw:style-name="gr5" draw:text-style-name="P61" draw:type="curve" svg:x1="3.7736in" svg:y1="1.7201in" svg:x2="2.9953in" svg:y2="2.7264in" draw:start-shape="id19" draw:start-glue-point="0" draw:end-shape="id21" draw:end-glue-point="0" svg:d="M9585-7548c-1319 0-1977 852-1977 2556" svg:viewBox="0 0 1979 2558"><text:p/></draw:connector><draw:custom-shape draw:style-name="gr12" draw:text-style-name="P60" svg:width="1.1094in" svg:height="0.6205in" svg:x="4.8618in" svg:y="2.75in"><text:p text:style-name="P58"><text:span text:style-name="T141">Miriam</text:span></text:p><text:p text:style-name="P58"><text:span text:style-name="T140">Num 26:5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xml:id="id23" draw:id="id23" draw:type="curve" svg:x1="2.4744in" svg:y1="3.039in" svg:x2="2.2665in" svg:y2="3.0402in" draw:start-shape="id21" draw:start-glue-point="3" draw:end-shape="id22" draw:end-glue-point="1" svg:d="M6285-4198c-397 0-134 3-528 3" svg:viewBox="0 0 529 5"><text:p/></draw:connector><draw:connector draw:style-name="gr5" draw:text-style-name="P61" draw:type="curve" svg:x1="2.3693in" svg:y1="3.0398in" svg:x2="1.8146in" svg:y2="3.9079in" draw:start-shape="id23" draw:start-glue-point="0" draw:end-shape="id24" draw:end-glue-point="0" svg:d="M6018-4196c0 1667-1409 564-1409 2205" svg:viewBox="0 0 1411 2207"><text:p/></draw:connector><draw:connector draw:style-name="gr5" draw:text-style-name="P61" draw:type="curve" svg:x1="1.8146in" svg:y1="4.5335in" svg:x2="1.8154in" svg:y2="4.75in" draw:start-shape="id24" draw:start-glue-point="2" draw:end-shape="id25" draw:end-glue-point="0" svg:d="M4609-402c0 413 2 137 2 550" svg:viewBox="0 0 4 552"><text:p/></draw:connector><draw:connector draw:style-name="gr5" draw:text-style-name="P61" draw:type="curve" svg:x1="2.3693in" svg:y1="3.0398in" svg:x2="2.9957in" svg:y2="3.9083in" draw:start-shape="id23" draw:start-glue-point="0" draw:end-shape="id26" draw:end-glue-point="0" svg:d="M6018-4196c0 1668 1591 566 1591 2206" svg:viewBox="0 0 1593 2208"><text:p/></draw:connector><draw:connector draw:style-name="gr5" draw:text-style-name="P61" draw:type="curve" svg:x1="1.8154in" svg:y1="5.5in" svg:x2="1.8146in" svg:y2="5.7945in" draw:start-shape="id25" draw:start-glue-point="2" draw:end-shape="id27" draw:end-glue-point="0" svg:d="M4611 2053c0 563-2 191-2 748" svg:viewBox="0 0 4 750"><text:p/></draw:connector><draw:connector draw:style-name="gr5" draw:text-style-name="P61" draw:type="curve" svg:x1="2.9965in" svg:y1="5.4in" svg:x2="2.9972in" svg:y2="5.7953in" draw:start-shape="id28" draw:start-glue-point="2" draw:end-shape="id29" draw:end-glue-point="0" svg:d="M7611 1799c0 753 2 252 2 1004" svg:viewBox="0 0 4 1005"><text:p/></draw:connector><draw:connector draw:style-name="gr5" draw:text-style-name="P61" draw:type="curve" svg:x1="2.9957in" svg:y1="4.5335in" svg:x2="2.9965in" svg:y2="4.7752in" draw:start-shape="id26" draw:start-glue-point="2" draw:end-shape="id28" draw:end-glue-point="0" svg:d="M7609-402c0 462 2 157 2 614" svg:viewBox="0 0 4 616"><text:p/></draw:connector><draw:custom-shape draw:style-name="gr2" draw:text-style-name="P59" xml:id="id24" draw:id="id24" svg:width="1.0433in" svg:height="0.626in" svg:x="1.2929in" svg:y="3.9075in"><text:p text:style-name="P58"><text:span text:style-name="T139">Gershom</text:span></text:p><text:p text:style-name="P58"><text:span text:style-name="T140">Exo 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6" draw:id="id26" svg:width="1.0425in" svg:height="0.6252in" svg:x="2.4752in" svg:y="3.9083in"><text:p text:style-name="P58"><text:span text:style-name="T139">Eliezer</text:span></text:p><text:p text:style-name="P58"><text:span text:style-name="T140">Exo 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3" draw:text-style-name="P59" xml:id="id25" draw:id="id25" svg:width="1.0425in" svg:height="0.7504in" svg:x="1.2945in" svg:y="4.75in"><text:p text:style-name="P58"><text:span text:style-name="T139">Shebuel</text:span></text:p><text:p text:style-name="P58"><text:span text:style-name="T140">1Ch 23:16</text:span></text:p><text:p text:style-name="P58"><text:span text:style-name="T146">Shubael</text:span></text:p><text:p text:style-name="P58"><text:span text:style-name="T140">1Ch 2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27" draw:id="id27" svg:width="1.0425in" svg:height="0.6252in" svg:x="1.2937in" svg:y="5.7945in"><text:p text:style-name="P58"><text:span text:style-name="T139">Jehdeiah</text:span></text:p><text:p text:style-name="P58"><text:span text:style-name="T140">1Ch 2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4" draw:text-style-name="P59" xml:id="id28" draw:id="id28" svg:width="1.0433in" svg:height="0.6252in" svg:x="2.4752in" svg:y="4.7752in"><text:p text:style-name="P58"><text:span text:style-name="T139">Rehabiah</text:span></text:p><text:p text:style-name="P58"><text:span text:style-name="T140">1Ch 23: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30" draw:id="id30" svg:width="1.0425in" svg:height="0.6252in" svg:x="3.7752in" svg:y="5.7953in"><text:p text:style-name="P58"><text:span text:style-name="T139">Isshiah</text:span></text:p><text:p text:style-name="P58"><text:span text:style-name="T140">1Ch 24: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9" draw:text-style-name="P59" xml:id="id29" draw:id="id29" svg:width="1.0425in" svg:height="0.626in" svg:x="2.4764in" svg:y="5.7953in"><text:p text:style-name="P58"><text:span text:style-name="T139">Jeshaiah</text:span></text:p><text:p text:style-name="P58"><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33" draw:id="id33" svg:width="1.0425in" svg:height="0.6252in" svg:x="2.4764in" svg:y="6.6783in"><text:p text:style-name="P58"><text:span text:style-name="T139">Joram</text:span></text:p><text:p text:style-name="P58"><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6" draw:text-style-name="P59" xml:id="id31" draw:id="id31" svg:width="1.0425in" svg:height="0.6252in" svg:x="2.4772in" svg:y="7.5327in"><text:p text:style-name="P58"><text:span text:style-name="T139">Zichri</text:span></text:p><text:p text:style-name="P58"><text:span text:style-name="T140">1Ch 26: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style-name="gr15" draw:text-style-name="P59" xml:id="id32" draw:id="id32" svg:width="1.2441in" svg:height="0.9697in" svg:x="2.3772in" svg:y="8.4134in"><text:p text:style-name="P58"><text:span text:style-name="T139">Shelomith</text:span></text:p><text:p text:style-name="P58"><text:span text:style-name="T140">1Ch 26:25-28</text:span></text:p><text:p text:style-name="P58"><text:span text:style-name="T147">Served at the tabernacle during reign of Saul &amp; Dav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style-name="gr5" draw:text-style-name="P61" draw:type="curve" svg:x1="2.9965in" svg:y1="5.4in" svg:x2="4.2957in" svg:y2="5.7953in" draw:start-shape="id28" draw:start-glue-point="2" draw:end-shape="id30" draw:end-glue-point="0" svg:d="M7611 1799c0 753 3300 252 3300 1004" svg:viewBox="0 0 3302 1005"><text:p/></draw:connector><draw:connector draw:style-name="gr5" draw:text-style-name="P61" draw:type="curve" svg:x1="2.998in" svg:y1="8.1575in" svg:x2="2.9984in" svg:y2="8.413in" draw:start-shape="id31" draw:start-glue-point="2" draw:end-shape="id32" draw:end-glue-point="0" svg:d="M7615 8803c0 488 1 165 1 649" svg:viewBox="0 0 4 651"><text:p/></draw:connector><draw:connector draw:style-name="gr5" draw:text-style-name="P61" draw:type="curve" svg:x1="2.9972in" svg:y1="7.3035in" svg:x2="2.998in" svg:y2="7.5327in" draw:start-shape="id33" draw:start-glue-point="2" draw:end-shape="id31" draw:end-glue-point="0" svg:d="M7613 6634c0 439 2 148 2 582" svg:viewBox="0 0 4 584"><text:p/></draw:connector><draw:connector draw:style-name="gr5" draw:text-style-name="P61" draw:type="curve" svg:x1="2.9972in" svg:y1="6.4209in" svg:x2="2.9972in" svg:y2="6.6783in" draw:start-shape="id29" draw:start-glue-point="2" draw:end-shape="id33" draw:end-glue-point="0" svg:d="M7613 4392v654" svg:viewBox="0 0 2 656"><text:p/></draw:connector></draw:g></text:p>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BlackChancery" svg:font-family="BlackChancery" style:font-pitch="variable"/>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0000" draw:gradient-step-count="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000000" draw:gradient-step-count="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3:00:51.176000000</meta:creation-date>
    <meta:editing-duration>P1DT1H4M38S</meta:editing-duration>
    <meta:editing-cycles>516</meta:editing-cycles>
    <meta:generator>LibreOffice/26.2.4.2$Linux_X86_64 LibreOffice_project/64a984c51f4702dbd3710b13428c673a2f1292e7</meta:generator>
    <dc:title>BibleStudyTemplate</dc:title>
    <dc:date>2026-07-11T12:30:46.627161539</dc:date>
    <meta:document-statistic meta:table-count="9" meta:image-count="0" meta:object-count="0" meta:page-count="8" meta:paragraph-count="80" meta:word-count="3344" meta:character-count="17371" meta:non-whitespace-character-count="14094"/>
    <meta:template xlink:type="simple" xlink:actuate="onRequest" xlink:title="BibleStudyTemplate" xlink:href="../../../../AppData/Roaming/LibreOffice/4/user/template/BibleStudyTemplate.ott" meta:date="2025-05-23T13:00:50.266000000"/>
  </office:meta>
</office:document-meta>
</file>