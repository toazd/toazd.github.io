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3" style:family="table">
      <style:table-properties style:width="7.9in" fo:break-before="page" table:align="margins" style:may-break-between-rows="true" table:border-model="collapsing"/>
    </style:style>
    <style:style style:name="Table13.A" style:family="table-column">
      <style:table-column-properties style:column-width="4.3278in" style:rel-column-width="35901*"/>
    </style:style>
    <style:style style:name="Table13.B" style:family="table-column">
      <style:table-column-properties style:column-width="3.5722in" style:rel-column-width="29634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in" fo:border="0.7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4875in" style:rel-column-width="20638*"/>
    </style:style>
    <style:style style:name="Table1.B" style:family="table-column">
      <style:table-column-properties style:column-width="2.7792in" style:rel-column-width="23054*"/>
    </style:style>
    <style:style style:name="Table1.C" style:family="table-column">
      <style:table-column-properties style:column-width="2.6333in" style:rel-column-width="21843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354" officeooo:paragraph-rsid="0029f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d3ce" officeooo:paragraph-rsid="002ad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2fcd" officeooo:paragraph-rsid="002c2f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92ad" officeooo:paragraph-rsid="002d92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e4a01" officeooo:paragraph-rsid="002e4a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5c0e" officeooo:paragraph-rsid="002f5c0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d45a" officeooo:paragraph-rsid="002fd45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0b08" officeooo:paragraph-rsid="00300b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f1e4" officeooo:paragraph-rsid="0030f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dc30" officeooo:paragraph-rsid="0032dc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a3f1" officeooo:paragraph-rsid="0033a3f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675b" officeooo:paragraph-rsid="0037675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d3bd" officeooo:paragraph-rsid="0038d3b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3ef3" officeooo:paragraph-rsid="003a3e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41dcf" officeooo:paragraph-rsid="00941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894c" officeooo:paragraph-rsid="003b89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cb6b" officeooo:paragraph-rsid="003bcb6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d5d41" officeooo:paragraph-rsid="003d5d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6a" officeooo:paragraph-rsid="003f33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0f8bf" officeooo:paragraph-rsid="0040f8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30c8" officeooo:paragraph-rsid="004230c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d1e4" officeooo:paragraph-rsid="0042d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415d6" officeooo:paragraph-rsid="004415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ad97" officeooo:paragraph-rsid="0045a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6b7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4bf" officeooo:paragraph-rsid="0046b4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2f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4d2" officeooo:paragraph-rsid="004a84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b7bf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e94b0" officeooo:paragraph-rsid="006e94b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/>
    </style:style>
    <style:style style:name="P41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226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2d74d" officeooo:paragraph-rsid="0092d74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f2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71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1d9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master-page-name="">
      <style:paragraph-properties style:page-number="auto" fo:break-before="auto" fo:break-after="auto"/>
      <style:text-properties style:font-name="Liberation Sans" fo:font-size="12pt" officeooo:rsid="00706212" officeooo:paragraph-rsid="001329f3" style:font-size-asian="12pt" style:font-size-complex="12pt"/>
    </style:style>
    <style:style style:name="P57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58" style:family="paragraph" style:parent-style-name="Table_20_Contents">
      <style:text-properties fo:font-size="12pt" officeooo:paragraph-rsid="007121d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60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0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63" style:family="paragraph" style:parent-style-name="Table_20_Contents" style:list-style-name="L11">
      <style:paragraph-properties fo:text-align="left" style:justify-single-word="false"/>
      <style:text-properties officeooo:paragraph-rsid="00716a94" fo:background-color="transparent"/>
    </style:style>
    <style:style style:name="P64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1">
      <style:paragraph-properties fo:text-align="left" style:justify-single-word="false"/>
      <style:text-properties officeooo:paragraph-rsid="00716a94"/>
    </style:style>
    <style:style style:name="P73" style:family="paragraph" style:parent-style-name="Table_20_Contents" style:list-style-name="L1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6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78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79" style:family="paragraph" style:parent-style-name="Standard" style:list-style-name="L18">
      <style:text-properties style:font-name="Liberation Sans" fo:font-size="12pt" officeooo:rsid="0078cf1c" officeooo:paragraph-rsid="0078cf1c" style:font-size-asian="12pt" style:font-size-complex="12pt"/>
    </style:style>
    <style:style style:name="P80" style:family="paragraph" style:parent-style-name="Standard" style:list-style-name="L18">
      <style:text-properties style:font-name="Liberation Sans" fo:font-size="12pt" officeooo:rsid="009db24a" officeooo:paragraph-rsid="009db24a" style:font-size-asian="12pt" style:font-size-complex="12pt"/>
    </style:style>
    <style:style style:name="P81" style:family="paragraph" style:parent-style-name="Standard" style:list-style-name="L18">
      <style:text-properties style:font-name="Liberation Sans" fo:font-size="12pt" officeooo:rsid="0078cf1c" officeooo:paragraph-rsid="008d2393" style:font-size-asian="12pt" style:font-size-complex="12pt"/>
    </style:style>
    <style:style style:name="P82" style:family="paragraph" style:parent-style-name="Standard" style:list-style-name="L18">
      <style:text-properties style:font-name="Liberation Sans" fo:font-size="12pt" officeooo:rsid="0095ff78" officeooo:paragraph-rsid="0095ff78" style:font-size-asian="12pt" style:font-size-complex="12pt"/>
    </style:style>
    <style:style style:name="P83" style:family="paragraph" style:parent-style-name="Standard">
      <style:text-properties style:font-name="Liberation Sans" fo:font-size="12pt" officeooo:rsid="007b8f68" officeooo:paragraph-rsid="007b8f68" style:font-size-asian="12pt" style:font-size-complex="12pt"/>
    </style:style>
    <style:style style:name="P84" style:family="paragraph" style:parent-style-name="Table_20_Contents">
      <style:text-properties fo:font-size="12pt" officeooo:paragraph-rsid="008c89ea" style:font-size-asian="12pt" style:font-size-complex="12pt"/>
    </style:style>
    <style:style style:name="T1" style:family="text">
      <style:text-properties officeooo:rsid="00366252"/>
    </style:style>
    <style:style style:name="T2" style:family="text">
      <style:text-properties officeooo:rsid="00941dcf"/>
    </style:style>
    <style:style style:name="T3" style:family="text">
      <style:text-properties officeooo:rsid="00485ce3"/>
    </style:style>
    <style:style style:name="T4" style:family="text">
      <style:text-properties officeooo:rsid="004caec2"/>
    </style:style>
    <style:style style:name="T5" style:family="text">
      <style:text-properties officeooo:rsid="004a8b4b"/>
    </style:style>
    <style:style style:name="T6" style:family="text">
      <style:text-properties officeooo:rsid="004e0341"/>
    </style:style>
    <style:style style:name="T7" style:family="text">
      <style:text-properties officeooo:rsid="0083e5ac"/>
    </style:style>
    <style:style style:name="T8" style:family="text">
      <style:text-properties officeooo:rsid="00845c55"/>
    </style:style>
    <style:style style:name="T9" style:family="text">
      <style:text-properties officeooo:rsid="008553e2"/>
    </style:style>
    <style:style style:name="T10" style:family="text">
      <style:text-properties officeooo:rsid="006f1f6f"/>
    </style:style>
    <style:style style:name="T11" style:family="text">
      <style:text-properties officeooo:rsid="00ffea0e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officeooo:rsid="0017fb3b"/>
    </style:style>
    <style:style style:name="T15" style:family="text">
      <style:text-properties officeooo:rsid="001947ee"/>
    </style:style>
    <style:style style:name="T16" style:family="text">
      <style:text-properties officeooo:rsid="001b024a"/>
    </style:style>
    <style:style style:name="T17" style:family="text">
      <style:text-properties officeooo:rsid="001c6ff9"/>
    </style:style>
    <style:style style:name="T18" style:family="text">
      <style:text-properties officeooo:rsid="001e4958"/>
    </style:style>
    <style:style style:name="T19" style:family="text">
      <style:text-properties officeooo:rsid="010004c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6bc357"/>
    </style:style>
    <style:style style:name="T22" style:family="text">
      <style:text-properties officeooo:rsid="0105498d"/>
    </style:style>
    <style:style style:name="T23" style:family="text">
      <style:text-properties officeooo:rsid="01060d4a"/>
    </style:style>
    <style:style style:name="T24" style:family="text">
      <style:text-properties officeooo:rsid="008fe3fd"/>
    </style:style>
    <style:style style:name="T25" style:family="text">
      <style:text-properties officeooo:rsid="0112fc8c"/>
    </style:style>
    <style:style style:name="T26" style:family="text">
      <style:text-properties officeooo:rsid="0101aba8"/>
    </style:style>
    <style:style style:name="T27" style:family="text">
      <style:text-properties style:text-position="0% 100%" officeooo:rsid="01062dd0"/>
    </style:style>
    <style:style style:name="T28" style:family="text">
      <style:text-properties style:text-position="0% 100%" officeooo:rsid="010de2fa"/>
    </style:style>
    <style:style style:name="T29" style:family="text">
      <style:text-properties officeooo:rsid="0115ac8c"/>
    </style:style>
    <style:style style:name="T30" style:family="text">
      <style:text-properties officeooo:rsid="0106f4a5"/>
    </style:style>
    <style:style style:name="T31" style:family="text">
      <style:text-properties officeooo:rsid="0094401a"/>
    </style:style>
    <style:style style:name="T32" style:family="text">
      <style:text-properties officeooo:rsid="00913e73"/>
    </style:style>
    <style:style style:name="T33" style:family="text">
      <style:text-properties officeooo:rsid="010846d0"/>
    </style:style>
    <style:style style:name="T34" style:family="text">
      <style:text-properties officeooo:rsid="009268a6"/>
    </style:style>
    <style:style style:name="T35" style:family="text">
      <style:text-properties officeooo:rsid="010de2fa"/>
    </style:style>
    <style:style style:name="T36" style:family="text">
      <style:text-properties fo:color="#ff0000" loext:opacity="100%" style:text-position="0% 100%"/>
    </style:style>
    <style:style style:name="T37" style:family="text">
      <style:text-properties officeooo:rsid="010c0d57"/>
    </style:style>
    <style:style style:name="T38" style:family="text">
      <style:text-properties officeooo:rsid="010f2921"/>
    </style:style>
    <style:style style:name="T39" style:family="text">
      <style:text-properties officeooo:rsid="00571c68"/>
    </style:style>
    <style:style style:name="T40" style:family="text">
      <style:text-properties officeooo:rsid="0050487d"/>
    </style:style>
    <style:style style:name="T41" style:family="text">
      <style:text-properties officeooo:rsid="0050b959"/>
    </style:style>
    <style:style style:name="T42" style:family="text">
      <style:text-properties officeooo:rsid="0051d991"/>
    </style:style>
    <style:style style:name="T43" style:family="text">
      <style:text-properties officeooo:rsid="0053ad76"/>
    </style:style>
    <style:style style:name="T44" style:family="text">
      <style:text-properties officeooo:rsid="0116a6fd"/>
    </style:style>
    <style:style style:name="T45" style:family="text">
      <style:text-properties style:text-underline-style="solid" style:text-underline-width="auto" style:text-underline-color="font-color" fo:background-color="#ffff00" loext:char-shading-value="0"/>
    </style:style>
    <style:style style:name="T46" style:family="text">
      <style:text-properties fo:color="#127622" loext:opacity="100%"/>
    </style:style>
    <style:style style:name="T47" style:family="text">
      <style:text-properties fo:color="#127622" loext:opacity="100%" officeooo:rsid="00ffea0e"/>
    </style:style>
    <style:style style:name="T48" style:family="text">
      <style:text-properties officeooo:rsid="010004cc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127622" loext:opacity="100%" style:text-position="0% 100%" officeooo:rsid="006bc357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3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4" style:family="text">
      <style:text-properties fo:color="#127622" loext:opacity="100%" officeooo:rsid="0105498d"/>
    </style:style>
    <style:style style:name="T55" style:family="text">
      <style:text-properties fo:color="#127622" loext:opacity="100%" officeooo:rsid="01060d4a"/>
    </style:style>
    <style:style style:name="T56" style:family="text">
      <style:text-properties officeooo:rsid="009ee1b3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127622" loext:opacity="100%" officeooo:rsid="00571c68"/>
    </style:style>
    <style:style style:name="T64" style:family="text">
      <style:text-properties fo:color="#127622" loext:opacity="100%" officeooo:rsid="0050487d"/>
    </style:style>
    <style:style style:name="T65" style:family="text">
      <style:text-properties fo:color="#127622" loext:opacity="100%" officeooo:rsid="0053ad76"/>
    </style:style>
    <style:style style:name="T66" style:family="text">
      <style:text-properties officeooo:rsid="009a113f"/>
    </style:style>
    <style:style style:name="T67" style:family="text">
      <style:text-properties officeooo:rsid="008d2393"/>
    </style:style>
    <style:style style:name="T68" style:family="text">
      <style:text-properties officeooo:rsid="009c04a4"/>
    </style:style>
    <style:style style:name="T69" style:family="text">
      <style:text-properties fo:color="#127622" loext:opacity="100%" officeooo:rsid="008d2393"/>
    </style:style>
    <style:style style:name="T70" style:family="text">
      <style:text-properties fo:color="#127622" loext:opacity="100%" officeooo:rsid="009c04a4"/>
    </style:style>
    <style:style style:name="T71" style:family="text">
      <style:text-properties officeooo:rsid="008c89ea"/>
    </style:style>
    <style:style style:name="T72" style:family="text">
      <style:text-properties fo:color="#127622" loext:opacity="100%" officeooo:rsid="008c89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Gen - 2Ch</text:p>
          </table:table-cell>
          <table:table-cell table:style-name="Table13.B1" office:value-type="string">
            <text:p text:style-name="P2">Matthew 1</text:p>
          </table:table-cell>
        </table:table-row>
        <table:table-row table:style-name="Table13.1">
          <table:table-cell table:style-name="Table13.A2" office:value-type="string">
            <text:list xml:id="list3077404837" text:style-name="L1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Jacob/Israel (1Ch 2:1, Gen 35:10)</text:p>
              </text:list-item>
              <text:list-item>
                <text:p text:style-name="P4">Judah (1Ch 2:1, Gen 29:35)</text:p>
              </text:list-item>
              <text:list-item>
                <text:p text:style-name="P5">Pharez/Perez (1Ch 2:4, 27:3)</text:p>
              </text:list-item>
              <text:list-item>
                <text:p text:style-name="P6">Hezron/Esrom (1Ch 2:5, Mat 1:3)</text:p>
              </text:list-item>
              <text:list-item>
                <text:p text:style-name="P7">Ram/Aram (1Ch 2:9, Mat 1:3,4)</text:p>
              </text:list-item>
              <text:list-item>
                <text:p text:style-name="P8">Amminadab/Aminadab (1Ch 2:10, Mat 1:4)</text:p>
              </text:list-item>
              <text:list-item>
                <text:p text:style-name="P9">Nahshon/Naasson (1Ch 2:10, Mat 1:4)</text:p>
              </text:list-item>
              <text:list-item>
                <text:p text:style-name="P10">Salma/Salmon (1Ch 2:11, Mat 1:5)</text:p>
              </text:list-item>
              <text:list-item>
                <text:p text:style-name="P10">Boaz/Booz (1Ch 2:11, Luk 3:32)</text:p>
              </text:list-item>
              <text:list-item>
                <text:p text:style-name="P11">Obed (1Ch 2:12)</text:p>
              </text:list-item>
              <text:list-item>
                <text:p text:style-name="P11">Jesse (1Ch 2:12)</text:p>
              </text:list-item>
              <text:list-item>
                <text:p text:style-name="P11">David (1Ch 2:15)</text:p>
              </text:list-item>
              <text:list-item>
                <text:p text:style-name="P12">Solomon/Jedidiah (2Sa 12:24,25)</text:p>
              </text:list-item>
              <text:list-item>
                <text:p text:style-name="P13">Rehoboam/Roboam <text:span text:style-name="T1">(1Ki 14:21, Mat 1:7)</text:span></text:p>
              </text:list-item>
              <text:list-item>
                <text:p text:style-name="P14">Abijam/Abijah/Abia (1Ki 14:31, 2Ch 12:16, 1Ch 3:10, Mat 1:7)</text:p>
              </text:list-item>
              <text:list-item>
                <text:p text:style-name="P15">Asa (1Ki 15:8, 2Ch 14:1)</text:p>
              </text:list-item>
              <text:list-item>
                <text:p text:style-name="P16">Jehoshaphat/Josaphat (1Ki 15:24, Mat 1:8)</text:p>
              </text:list-item>
              <text:list-item>
                <text:p text:style-name="P17">Elder Ahaziah</text:p>
              </text:list-item>
              <text:list-item>
                <text:p text:style-name="P18"><text:span text:style-name="T2">Younger </text:span>Ahaziah/Jehoahaz/Azariah (2Ki 8:24, 2Ch 21:17, 2Ch 22:6)</text:p>
              </text:list-item>
              <text:list-item>
                <text:p text:style-name="P19">Joash/Jehoash (2Ki 13:1, 11:21)</text:p>
              </text:list-item>
              <text:list-item>
                <text:p text:style-name="P20">Amaziah (2Ki 12:20,21, 2Ch 24:27)</text:p>
              </text:list-item>
              <text:list-item>
                <text:p text:style-name="P21">Azariah/Uzziah/Ozias (2Ki 14:21, 2Ch 26:1, Mat 1:8,9)</text:p>
              </text:list-item>
              <text:list-item>
                <text:p text:style-name="P22">Jotham/Joatham (2Ki 15:7, Mat 1:9)</text:p>
              </text:list-item>
              <text:list-item>
                <text:p text:style-name="P23">Ahaz/Achaz (2Ki 15:38, Mat 1:9)</text:p>
              </text:list-item>
              <text:list-item>
                <text:p text:style-name="P24">Hezekiah/Ezekias (2Ki 16:20, Mat 1:9,10)</text:p>
              </text:list-item>
              <text:list-item>
                <text:p text:style-name="P25">Manasseh/Manasses (2Ki 20:21, Mat 1:10)</text:p>
              </text:list-item>
              <text:list-item>
                <text:p text:style-name="P26">Amon (2Ki 21:18)</text:p>
              </text:list-item>
              <text:list-item>
                <text:p text:style-name="P27">Josiah/Josias (2Ki 21:24, Mat 1:10,11)</text:p>
              </text:list-item>
              <text:list-item>
                <text:p text:style-name="P28">Jehoahaz/Shallum (2Ki 23:30, Jer 22:11)</text:p>
              </text:list-item>
              <text:list-item>
                <text:p text:style-name="P29">Eliakim/Jehoiakim (2Ki 23:34)</text:p>
              </text:list-item>
              <text:list-item>
                <text:p text:style-name="P30">Jehoiachin/Jeconiah/Coniah/Jechonias (2Ki 24:6, 1Ch 3:16, Jer 22:24, Mat 1:11)</text:p>
              </text:list-item>
            </text:list>
            <text:list text:style-name="L2">
              <text:list-item>
                <text:p text:style-name="P31">Mattaniah/Zedekiah (2Ki 24:17, 2Ch 36:10<text:span text:style-name="T3">)</text:span></text:p>
              </text:list-item>
              <text:list-item>
                <text:p text:style-name="P31">Gedaliah (2Ki 25:22)</text:p>
              </text:list-item>
            </text:list>
            <text:list text:continue-list="list3077404837" text:style-name="L1">
              <text:list-item>
                <text:p text:style-name="P32">Salathiel/<text:span text:style-name="T4">Shealtiel</text:span> (1Ch 3:17, <text:span text:style-name="T4">Ezr 3:8, </text:span><text:span text:style-name="T5">Mat 1:12</text:span>)</text:p>
              </text:list-item>
              <text:list-item>
                <text:p text:style-name="P33">Pedaiah (Salathiel’s brother) (1Ch 3:17-19)</text:p>
              </text:list-item>
              <text:list-item>
                <text:p text:style-name="P34"><text:span text:style-name="T6">Zerubbabel/</text:span>Zorobabel (<text:span text:style-name="T6">1Ch 3:19, </text:span>Mat 1:12)</text:p>
              </text:list-item>
            </text:list>
            <text:p text:style-name="P35"/>
            <text:p text:style-name="P36">NOTE: We have no record of Salathiel/Shealtiel <text:span text:style-name="T7">having</text:span> a son named Zorobab<text:span text:style-name="T8">el</text:span>/Zerubbabel in the old testament. In 1Ch 3:17-19 we do see that his brother Pedaiah does have a son named Zorobabel/Zerubbabel. <text:span text:style-name="T9">The most l</text:span>ikely <text:span text:style-name="T9">explanation is that</text:span> Salathiel died and his brother Pedaiah raised a son in <text:span text:style-name="T10">the name of his brother</text:span> (<text:span text:style-name="T9">Deu 25:5; “law of the </text:span>kinsmen redeemer”; like Boaz/Booz).</text:p>
          </table:table-cell>
          <table:table-cell table:style-name="Table13.B2" office:value-type="string">
            <text:list xml:id="list857050883" text:style-name="L3">
              <text:list-item>
                <text:p text:style-name="P37">Abraham</text:p>
              </text:list-item>
              <text:list-item>
                <text:p text:style-name="P38">Isaac</text:p>
              </text:list-item>
              <text:list-item>
                <text:p text:style-name="P38">Jacob</text:p>
              </text:list-item>
              <text:list-item>
                <text:p text:style-name="P38">Judas (Judah) Gen 46:12</text:p>
              </text:list-item>
              <text:list-item>
                <text:p text:style-name="P38">Phares <text:span text:style-name="T11">(Pharez) </text:span><text:span text:style-name="T12">&amp; Zara </text:span><text:span text:style-name="T13">(Zerah)</text:span><text:span text:style-name="T12"> </text:span><text:span text:style-name="T11">Gen 46:12</text:span></text:p>
              </text:list-item>
              <text:list-item>
                <text:p text:style-name="P39"><text:span text:style-name="T14">Hezron/</text:span>Esrom</text:p>
              </text:list-item>
              <text:list-item>
                <text:p text:style-name="P39"><text:span text:style-name="T15">Ram/</text:span>Aram</text:p>
              </text:list-item>
              <text:list-item>
                <text:p text:style-name="P39"><text:span text:style-name="T16">Amminadab/</text:span>Aminadab</text:p>
              </text:list-item>
              <text:list-item>
                <text:p text:style-name="P39"><text:span text:style-name="T17">Nahshon/</text:span>Naasson</text:p>
              </text:list-item>
              <text:list-item>
                <text:p text:style-name="P39">Salmon</text:p>
              </text:list-item>
              <text:list-item>
                <text:p text:style-name="P39"><text:span text:style-name="T18">Boaz/</text:span>Booz</text:p>
              </text:list-item>
              <text:list-item>
                <text:p text:style-name="P39">Obed</text:p>
              </text:list-item>
              <text:list-item>
                <text:p text:style-name="P39">Jesse</text:p>
              </text:list-item>
              <text:list-item>
                <text:p text:style-name="P40"><text:span text:style-name="T19">David</text:span><text:span text:style-name="T20"> </text:span><text:span text:style-name="T21">(1Ch 3)</text:span></text:p>
              </text:list-item>
              <text:list-item>
                <text:p text:style-name="P39">Solomon</text:p>
              </text:list-item>
              <text:list-item>
                <text:p text:style-name="P41">Roboam</text:p>
              </text:list-item>
              <text:list-item>
                <text:p text:style-name="P39">Abia</text:p>
              </text:list-item>
              <text:list-item>
                <text:p text:style-name="P39">Asa</text:p>
              </text:list-item>
              <text:list-item>
                <text:p text:style-name="P42">Josaphat <text:span text:style-name="T22">(Jehoshaphat 1Ki 15:24</text:span><text:span text:style-name="T23">)</text:span></text:p>
              </text:list-item>
              <text:list-item>
                <text:p text:style-name="P42">Joram <text:span text:style-name="T23">(Jehoram 2Ki 8:16)</text:span></text:p>
              </text:list-item>
            </text:list>
            <text:list text:style-name="L4">
              <text:list-item>
                <text:p text:style-name="P43">Elder Ahaziah</text:p>
              </text:list-item>
            </text:list>
            <text:list text:style-name="L5">
              <text:list-item>
                <text:p text:style-name="P44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44">Joash <text:span text:style-name="T25">(Jehoash)</text:span></text:p>
              </text:list-item>
              <text:list-item>
                <text:p text:style-name="P44">Amaziah</text:p>
              </text:list-item>
            </text:list>
            <text:list xml:id="list122021539123756" text:continue-list="list857050883" text:style-name="L3">
              <text:list-item>
                <text:p text:style-name="P45"><text:span text:style-name="T26">Ozias </text:span><text:span text:style-name="T27">(Azariah/Uzziah</text:span><text:span text:style-name="T28">)</text:span></text:p>
              </text:list-item>
              <text:list-item>
                <text:p text:style-name="P42">Joatham <text:span text:style-name="T29">(Jotham)</text:span></text:p>
              </text:list-item>
              <text:list-item>
                <text:p text:style-name="P42">Achaz</text:p>
              </text:list-item>
              <text:list-item>
                <text:p text:style-name="P46">Ezekias <text:span text:style-name="T30">(Hezekiah)</text:span></text:p>
              </text:list-item>
              <text:list-item>
                <text:p text:style-name="P42">Manasses <text:span text:style-name="T30">(Manasseh)</text:span></text:p>
              </text:list-item>
              <text:list-item>
                <text:p text:style-name="P42">Amon</text:p>
              </text:list-item>
              <text:list-item>
                <text:p text:style-name="P46">Josias <text:span text:style-name="T30">(Josiah)</text:span></text:p>
              </text:list-item>
            </text:list>
            <text:list text:style-name="L6">
              <text:list-item>
                <text:p text:style-name="P47">Jehoahaz/<text:span text:style-name="T31">Shallum</text:span> <text:span text:style-name="T32">(son of Josiah)</text:span></text:p>
              </text:list-item>
            </text:list>
            <text:list text:style-name="L7">
              <text:list-item>
                <text:p text:style-name="P48">Eliakim/Jehoiakim <text:span text:style-name="T32">(son of Josiah)</text:span></text:p>
              </text:list-item>
            </text:list>
            <text:list xml:id="list122022596816302" text:continue-list="list122021539123756" text:style-name="L3">
              <text:list-item>
                <text:p text:style-name="P49">Jechonias <text:span text:style-name="T33">(</text:span><text:span text:style-name="T34">Elder </text:span><text:span text:style-name="T35">Jehoi</text:span><text:span text:style-name="T34">a</text:span><text:span text:style-name="T35">chin/</text:span><text:span text:style-name="T33">Jeconiah/</text:span><text:span text:style-name="T34">Coniah</text:span><text:span text:style-name="T33">)</text:span><text:span text:style-name="T20">(</text:span><text:span text:style-name="T36">Babylon</text:span><text:span text:style-name="T20">)</text:span></text:p>
              </text:list-item>
            </text:list>
            <text:list text:style-name="L8">
              <text:list-item>
                <text:p text:style-name="P50">Younger Jehoiachin</text:p>
              </text:list-item>
            </text:list>
            <text:list xml:id="list122022212124846" text:continue-list="list122022596816302" text:style-name="L3">
              <text:list-item>
                <text:p text:style-name="P42">Salathiel <text:span text:style-name="T37">(Shealtiel)</text:span></text:p>
              </text:list-item>
            </text:list>
            <text:list text:style-name="L9">
              <text:list-item>
                <text:p text:style-name="P51">Pedaiah (Salathiel’s brother) (1Ch 3:17-19)</text:p>
              </text:list-item>
            </text:list>
            <text:list text:continue-list="list122022212124846" text:style-name="L3">
              <text:list-item>
                <text:p text:style-name="P52">Zorobabel <text:span text:style-name="T38">(Zerubbabel </text:span><text:span text:style-name="T39">Ezr 3:2</text:span><text:span text:style-name="T38">)</text:span></text:p>
              </text:list-item>
              <text:list-item>
                <text:p text:style-name="P52">Abiud</text:p>
              </text:list-item>
              <text:list-item>
                <text:p text:style-name="P42">Eliakim</text:p>
              </text:list-item>
              <text:list-item>
                <text:p text:style-name="P42">Azor <text:span text:style-name="T40">(Azzur? Neh 9:38-10:17, </text:span><text:span text:style-name="T41">G107→H5809</text:span><text:span text:style-name="T40">)</text:span></text:p>
              </text:list-item>
              <text:list-item>
                <text:p text:style-name="P53">Sadoc <text:span text:style-name="T42">(Zadok? </text:span><text:span text:style-name="T40">Neh 9:38-10:17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42">Achim <text:span text:style-name="T43">(Jokim? 1Ch 4:21-22, G885→H3137)</text:span></text:p>
              </text:list-item>
              <text:list-item>
                <text:p text:style-name="P42">Eliud</text:p>
              </text:list-item>
              <text:list-item>
                <text:p text:style-name="P42">Eleazar</text:p>
              </text:list-item>
              <text:list-item>
                <text:p text:style-name="P42">Matthan</text:p>
              </text:list-item>
              <text:list-item>
                <text:p text:style-name="P42">Jacob</text:p>
              </text:list-item>
              <text:list-item>
                <text:p text:style-name="P42"><text:soft-page-break/>Joseph<text:span text:style-name="T20"/></text:p>
              </text:list-item>
              <text:list-item>
                <text:p text:style-name="P54"><text:span text:style-name="T44">J</text:span>esus</text:p>
              </text:list-item>
            </text:list>
            <text:p text:style-name="P55"/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7">Matthew 1:17</text:p>
            <text:p text:style-name="P58">So all the generations from Abraham to David are fourteen generations; and from David until the carrying away into Babylon are fourteen generations; and from the carrying away into Babylon unto Christ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9">from Abraham <text:span text:style-name="T45">to</text:span> David</text:p>
          </table:table-cell>
          <table:table-cell table:style-name="Table1.A2" office:value-type="string">
            <text:p text:style-name="P59">from David <text:span text:style-name="T45">until</text:span> the carrying away into Babylon</text:p>
          </table:table-cell>
          <table:table-cell table:style-name="Table1.C2" office:value-type="string">
            <text:p text:style-name="P59">from the carrying away into Babylon <text:span text:style-name="T45">unto</text:span> Christ</text:p>
          </table:table-cell>
        </table:table-row>
        <table:table-row>
          <table:table-cell table:style-name="Table1.A3" office:value-type="string">
            <text:list text:style-name="L10">
              <text:list-item>
                <text:p text:style-name="P60">Abraham</text:p>
              </text:list-item>
              <text:list-item>
                <text:p text:style-name="P60">Isaac</text:p>
              </text:list-item>
              <text:list-item>
                <text:p text:style-name="P60">Jacob</text:p>
              </text:list-item>
              <text:list-item>
                <text:p text:style-name="P60">Judas (Judah) <text:span text:style-name="T46">Gen 46:12</text:span></text:p>
              </text:list-item>
              <text:list-item>
                <text:p text:style-name="P60">Phares <text:span text:style-name="T11">(Pharez) </text:span><text:span text:style-name="T12">&amp; Zara </text:span><text:span text:style-name="T13">(Zerah)</text:span><text:span text:style-name="T12"> </text:span><text:span text:style-name="T47">Gen 46:12</text:span></text:p>
              </text:list-item>
              <text:list-item>
                <text:p text:style-name="P61"><text:span text:style-name="T14">Hezron/</text:span>Esrom</text:p>
              </text:list-item>
              <text:list-item>
                <text:p text:style-name="P61"><text:span text:style-name="T15">Ram/</text:span>Aram</text:p>
              </text:list-item>
              <text:list-item>
                <text:p text:style-name="P61"><text:span text:style-name="T16">Amminadab/</text:span>Aminadab</text:p>
              </text:list-item>
              <text:list-item>
                <text:p text:style-name="P61"><text:span text:style-name="T17">Nahshon/</text:span>Naasson</text:p>
              </text:list-item>
              <text:list-item>
                <text:p text:style-name="P61">Salmon</text:p>
              </text:list-item>
              <text:list-item>
                <text:p text:style-name="P61"><text:span text:style-name="T18">Boaz/</text:span>Booz</text:p>
              </text:list-item>
              <text:list-item>
                <text:p text:style-name="P61">Obed</text:p>
              </text:list-item>
              <text:list-item>
                <text:p text:style-name="P61">Jesse</text:p>
              </text:list-item>
              <text:list-item>
                <text:p text:style-name="P62"><text:span text:style-name="T48">David</text:span><text:span text:style-name="T20"> </text:span><text:span text:style-name="T21">(</text:span><text:span text:style-name="T49">1Ch 3</text:span><text:span text:style-name="T21">)</text:span></text:p>
              </text:list-item>
            </text:list>
          </table:table-cell>
          <table:table-cell table:style-name="Table1.B3" office:value-type="string">
            <text:list xml:id="list1696975337" text:style-name="L11">
              <text:list-item>
                <text:p text:style-name="P63"><text:span text:style-name="T50">David</text:span><text:span text:style-name="T51"> </text:span><text:span text:style-name="T52">(</text:span><text:span text:style-name="T53">1Ch 3</text:span><text:span text:style-name="T52">)</text:span></text:p>
              </text:list-item>
              <text:list-item>
                <text:p text:style-name="P64">Solomon</text:p>
              </text:list-item>
              <text:list-item>
                <text:p text:style-name="P65">Roboam</text:p>
              </text:list-item>
              <text:list-item>
                <text:p text:style-name="P64">Abia</text:p>
              </text:list-item>
              <text:list-item>
                <text:p text:style-name="P64">Asa</text:p>
              </text:list-item>
              <text:list-item>
                <text:p text:style-name="P66">Josaphat <text:span text:style-name="T22">(Jehoshaphat </text:span><text:span text:style-name="T54">1Ki 15:24</text:span><text:span text:style-name="T23">)</text:span></text:p>
              </text:list-item>
              <text:list-item>
                <text:p text:style-name="P66">Joram <text:span text:style-name="T23">(Jehoram </text:span><text:span text:style-name="T55">2Ki 8:16</text:span><text:span text:style-name="T23">)</text:span></text:p>
              </text:list-item>
            </text:list>
            <text:list text:style-name="L12">
              <text:list-item>
                <text:p text:style-name="P67">Elder Ahaziah</text:p>
              </text:list-item>
            </text:list>
            <text:list text:style-name="L13">
              <text:list-item>
                <text:p text:style-name="P68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68">Joash <text:span text:style-name="T25">(Jehoash)</text:span></text:p>
              </text:list-item>
              <text:list-item>
                <text:p text:style-name="P68">Amaziah</text:p>
              </text:list-item>
            </text:list>
            <text:list xml:id="list122021659580502" text:continue-list="list1696975337" text:style-name="L11">
              <text:list-item>
                <text:p text:style-name="P69"><text:span text:style-name="T26">Ozias </text:span><text:span text:style-name="T27">(Azariah/Uzziah</text:span><text:span text:style-name="T28">)</text:span></text:p>
              </text:list-item>
              <text:list-item>
                <text:p text:style-name="P66">Joatham <text:span text:style-name="T29">(Jotham)</text:span></text:p>
              </text:list-item>
              <text:list-item>
                <text:p text:style-name="P66">Achaz</text:p>
              </text:list-item>
              <text:list-item>
                <text:p text:style-name="P66">Ezekias <text:span text:style-name="T30">(Hezekiah)</text:span></text:p>
              </text:list-item>
              <text:list-item>
                <text:p text:style-name="P66">Manasses <text:span text:style-name="T30">(Manasseh)</text:span></text:p>
              </text:list-item>
              <text:list-item>
                <text:p text:style-name="P66">Amon</text:p>
              </text:list-item>
              <text:list-item>
                <text:p text:style-name="P66">Josias <text:span text:style-name="T30">(Josiah)</text:span></text:p>
              </text:list-item>
            </text:list>
            <text:list text:style-name="L14">
              <text:list-item>
                <text:p text:style-name="P70">Jehoahaz/<text:span text:style-name="T56">Shallum</text:span></text:p>
              </text:list-item>
              <text:list-item>
                <text:p text:style-name="P71">Eliakim/Jehoiakim</text:p>
              </text:list-item>
            </text:list>
            <text:list text:continue-list="list122021659580502" text:style-name="L11">
              <text:list-item>
                <text:p text:style-name="P72"><text:span text:style-name="T57">Jechonias </text:span><text:span text:style-name="T58">(</text:span><text:span text:style-name="T59">Elder </text:span><text:span text:style-name="T60">Jehoi</text:span><text:span text:style-name="T59">a</text:span><text:span text:style-name="T60">chin/</text:span><text:span text:style-name="T58">Jeconiah/</text:span><text:span text:style-name="T59">Coniah</text:span><text:span text:style-name="T58">)</text:span><text:span text:style-name="T61">(</text:span><text:span text:style-name="T62">Babylon</text:span><text:span text:style-name="T61">)</text:span></text:p>
              </text:list-item>
            </text:list>
            <text:list text:style-name="L15">
              <text:list-item>
                <text:p text:style-name="P73">Younger Jehoiachin</text:p>
              </text:list-item>
            </text:list>
          </table:table-cell>
          <table:table-cell table:style-name="Table1.C3" office:value-type="string">
            <text:list xml:id="list3836682981" text:style-name="L16">
              <text:list-item>
                <text:p text:style-name="P74">Jechonias <text:span text:style-name="T33">(</text:span><text:span text:style-name="T35">Jehoichin/</text:span><text:span text:style-name="T33">Jeconiah)</text:span><text:span text:style-name="T20">(</text:span><text:span text:style-name="T36">Babylon</text:span><text:span text:style-name="T20">)</text:span></text:p>
              </text:list-item>
              <text:list-item>
                <text:p text:style-name="P74">Salathiel <text:span text:style-name="T37">(Shealtiel)</text:span></text:p>
              </text:list-item>
            </text:list>
            <text:list text:style-name="L17">
              <text:list-item>
                <text:p text:style-name="P75">Pedaiah (Salathiel’s brother) (<text:span text:style-name="T46">1Ch 3:17-19</text:span>)</text:p>
              </text:list-item>
            </text:list>
            <text:list text:continue-list="list3836682981" text:style-name="L16">
              <text:list-item>
                <text:p text:style-name="P74">Zorobabel <text:span text:style-name="T38">(Zerubbabel </text:span><text:span text:style-name="T63">Ezr 3:2</text:span><text:span text:style-name="T38">)</text:span></text:p>
              </text:list-item>
              <text:list-item>
                <text:p text:style-name="P74">Abiud</text:p>
              </text:list-item>
              <text:list-item>
                <text:p text:style-name="P74">Eliakim</text:p>
              </text:list-item>
              <text:list-item>
                <text:p text:style-name="P74">Azor <text:span text:style-name="T40">(Azzur? </text:span><text:span text:style-name="T64">Neh 9:38-10:17</text:span><text:span text:style-name="T40">, </text:span><text:span text:style-name="T41">G107→H5809</text:span><text:span text:style-name="T40">)</text:span></text:p>
              </text:list-item>
              <text:list-item>
                <text:p text:style-name="P74">Sadoc <text:span text:style-name="T42">(Zadok? </text:span><text:span text:style-name="T64">Neh 9:38-10:17</text:span><text:span text:style-name="T40">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74">Achim <text:span text:style-name="T43">(Jokim? </text:span><text:span text:style-name="T65">1Ch 4:21-22</text:span><text:span text:style-name="T43">, G885→H3137)</text:span></text:p>
              </text:list-item>
              <text:list-item>
                <text:p text:style-name="P74">Eliud</text:p>
              </text:list-item>
              <text:list-item>
                <text:p text:style-name="P74">Eleazar</text:p>
              </text:list-item>
              <text:list-item>
                <text:p text:style-name="P74">Matthan</text:p>
              </text:list-item>
              <text:list-item>
                <text:p text:style-name="P74">Jacob</text:p>
              </text:list-item>
              <text:list-item>
                <text:p text:style-name="P74">Joseph</text:p>
              </text:list-item>
              <text:list-item>
                <text:p text:style-name="P76"><text:span text:style-name="T44">J</text:span>esus</text:p>
              </text:list-item>
            </text:list>
          </table:table-cell>
        </table:table-row>
      </table:table>
      <text:p text:style-name="P77"/>
      <text:p text:style-name="P78">Misc notes</text:p>
      <text:p text:style-name="P78"/>
      <text:list text:style-name="L18">
        <text:list-item>
          <text:p text:style-name="P79">Josias did not make it into Babylon.</text:p>
        </text:list-item>
        <text:list-item>
          <text:p text:style-name="P80">Jehoahaz/Shallum was taken and would not return (<text:span text:style-name="T46">Jer 22:11</text:span>).</text:p>
        </text:list-item>
        <text:list-item>
          <text:p text:style-name="P81">Eliakim/<text:span text:style-name="T66">Jehoiakim</text:span> <text:span text:style-name="T67">was carried to Babylon </text:span><text:span text:style-name="T68">before dying</text:span><text:span text:style-name="T67"> </text:span><text:span text:style-name="T68">and </text:span><text:span text:style-name="T67">after reigning for 11yrs in Jerusalem (</text:span><text:span text:style-name="T69">2Ch 36:4-6</text:span><text:span text:style-name="T67">, </text:span><text:span text:style-name="T70">2Ki 24:6</text:span><text:span text:style-name="T68">)</text:span></text:p>
          <text:list>
            <text:list-item>
              <text:p text:style-name="P82">The elder and younger Jehoiachin were carried to Babylon at the same time as their father Eliakim/Jehoiakim before reigning on their own (<text:span text:style-name="T46">Jer 36:30</text:span>).</text:p>
            </text:list-item>
          </text:list>
        </text:list-item>
      </text:list>
      <text:p text:style-name="P83"/>
      <table:table table:name="Table2" table:style-name="Table2">
        <table:table-column table:style-name="Table2.A"/>
        <table:table-row>
          <table:table-cell table:style-name="Table2.A1" office:value-type="string">
            <text:p text:style-name="P84"><text:span text:style-name="T46">Jeremiah 33:20-21</text:span> <text:span text:style-name="T71">(</text:span><text:span text:style-name="T72">Gen 8:22</text:span><text:span text:style-name="T71">)</text:span></text:p>
            <text:p text:style-name="P84">20 Thus saith the LORD; If ye can break my covenant of the day, and my covenant of the night, and that there should not be day and night in their season;</text:p>
            <text:p text:style-name="P84">21 Then may also my covenant be broken with David my servant, that he should not have a son to reign upon his throne; and with the Levites the priests, my ministers.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4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.2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20:20.588812404</dc:date>
    <meta:editing-duration>PT10H23M22S</meta:editing-duration>
    <meta:editing-cycles>139</meta:editing-cycles>
    <meta:generator>LibreOffice/26.2.4.2$Linux_X86_64 LibreOffice_project/64a984c51f4702dbd3710b13428c673a2f1292e7</meta:generator>
    <dc:title>Matthew 1</dc:title>
    <meta:print-date>2025-06-30T17:25:07.136148445</meta:print-date>
    <meta:printed-by>PDF files</meta:printed-by>
    <meta:document-statistic meta:table-count="3" meta:image-count="0" meta:object-count="0" meta:page-count="2" meta:paragraph-count="154" meta:word-count="779" meta:character-count="4726" meta:non-whitespace-character-count="4243"/>
  </office:meta>
</office:document-meta>
</file>