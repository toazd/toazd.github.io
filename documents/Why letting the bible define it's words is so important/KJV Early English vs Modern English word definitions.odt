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blbGentium" svg:font-family="blbGentium" style:font-family-generic="roman" style:font-pitch="variable"/>
  </office:font-face-decls>
  <office:automatic-styles>
    <style:style style:name="Table1" style:family="table">
      <style:table-properties style:width="7.6979in" fo:margin-left="0in" fo:margin-top="0in" fo:margin-bottom="0in" table:align="left" style:writing-mode="lr-tb"/>
    </style:style>
    <style:style style:name="Table1.A" style:family="table-column">
      <style:table-column-properties style:column-width="4.1667in"/>
    </style:style>
    <style:style style:name="Table1.B" style:family="table-column">
      <style:table-column-properties style:column-width="3.5313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8in" style:rel-width="100%" fo:margin-left="0in" fo:margin-top="0in" fo:margin-bottom="0in" table:align="left" style:writing-mode="lr-tb"/>
    </style:style>
    <style:style style:name="Table2.A" style:family="table-column">
      <style:table-column-properties style:column-width="4in" style:rel-column-width="32767*"/>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8in" style:rel-width="100%" fo:margin-left="0in" fo:margin-top="0in" fo:margin-bottom="0in" table:align="left" style:writing-mode="lr-tb"/>
    </style:style>
    <style:style style:name="Table3.A" style:family="table-column">
      <style:table-column-properties style:column-width="4in" style:rel-column-width="32767*"/>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fo:padding="0.0382in" fo:border-left="0.5pt solid #000000" fo:border-right="0.5pt solid #000000" fo:border-top="0.5pt solid #000000" fo:border-bottom="none"/>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in" style:rel-width="100%" fo:margin-left="0in" fo:margin-top="0in" fo:margin-bottom="0in" table:align="left" style:writing-mode="lr-tb"/>
    </style:style>
    <style:style style:name="Table4.A" style:family="table-column">
      <style:table-column-properties style:column-width="4in" style:rel-column-width="32767*"/>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none"/>
    </style:style>
    <style:style style:name="Table4.B1" style:family="table-cell">
      <style:table-cell-properties fo:padding="0.0382in" fo:border-left="0.5pt solid #000000" fo:border-right="0.5pt solid #000000" fo:border-top="0.5pt solid #000000" fo:border-bottom="none"/>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8in" style:rel-width="100%" fo:margin-left="0in" fo:margin-top="0in" fo:margin-bottom="0in" table:align="left" style:writing-mode="lr-tb"/>
    </style:style>
    <style:style style:name="Table5.A" style:family="table-column">
      <style:table-column-properties style:column-width="4in" style:rel-column-width="32767*"/>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none"/>
    </style:style>
    <style:style style:name="Table5.B1" style:family="table-cell">
      <style:table-cell-properties fo:padding="0.0382in" fo:border-left="0.5pt solid #000000" fo:border-right="0.5pt solid #000000" fo:border-top="0.5pt solid #000000" fo:border-bottom="none"/>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8in" style:rel-width="100%" fo:margin-left="0in" fo:margin-top="0in" fo:margin-bottom="0in" table:align="left" style:writing-mode="lr-tb"/>
    </style:style>
    <style:style style:name="Table6.A" style:family="table-column">
      <style:table-column-properties style:column-width="4in" style:rel-column-width="32767*"/>
    </style:style>
    <style:style style:name="Table6.1" style:family="table-row">
      <style:table-row-properties fo:keep-together="auto"/>
    </style:style>
    <style:style style:name="Table6.A1" style:family="table-cell">
      <style:table-cell-properties fo:padding="0.0382in" fo:border-left="0.5pt solid #000000" fo:border-right="none" fo:border-top="0.5pt solid #000000" fo:border-bottom="none"/>
    </style:style>
    <style:style style:name="Table6.B1" style:family="table-cell">
      <style:table-cell-properties fo:padding="0.0382in" fo:border-left="0.5pt solid #000000" fo:border-right="0.5pt solid #000000" fo:border-top="0.5pt solid #000000" fo:border-bottom="none"/>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7.6979in" fo:margin-left="0in" fo:margin-top="0in" fo:margin-bottom="0in" table:align="left" style:writing-mode="lr-tb"/>
    </style:style>
    <style:style style:name="Table7.A" style:family="table-column">
      <style:table-column-properties style:column-width="3.8542in"/>
    </style:style>
    <style:style style:name="Table7.B" style:family="table-column">
      <style:table-column-properties style:column-width="3.8438in"/>
    </style:style>
    <style:style style:name="Table7.1" style:family="table-row">
      <style:table-row-properties fo:keep-together="auto"/>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7.6979in" fo:margin-left="0in" fo:margin-top="0in" fo:margin-bottom="0in" table:align="left" style:writing-mode="lr-tb"/>
    </style:style>
    <style:style style:name="Table8.A" style:family="table-column">
      <style:table-column-properties style:column-width="3.8542in"/>
    </style:style>
    <style:style style:name="Table8.B" style:family="table-column">
      <style:table-column-properties style:column-width="3.8438in"/>
    </style:style>
    <style:style style:name="Table8.1" style:family="table-row">
      <style:table-row-properties fo:keep-together="auto"/>
    </style:style>
    <style:style style:name="Table8.A1" style:family="table-cell">
      <style:table-cell-properties fo:padding="0.0382in" fo:border-left="0.5pt solid #000000" fo:border-right="none" fo:border-top="0.5pt solid #000000" fo:border-bottom="none"/>
    </style:style>
    <style:style style:name="Table8.B1" style:family="table-cell">
      <style:table-cell-properties fo:padding="0.0382in" fo:border-left="0.5pt solid #000000" fo:border-right="0.5pt solid #000000" fo:border-top="0.5pt solid #000000" fo:border-bottom="none"/>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7.6979in" fo:margin-left="0in" fo:margin-top="0in" fo:margin-bottom="0in" table:align="left" style:writing-mode="lr-tb"/>
    </style:style>
    <style:style style:name="Table9.A" style:family="table-column">
      <style:table-column-properties style:column-width="3.8542in"/>
    </style:style>
    <style:style style:name="Table9.B" style:family="table-column">
      <style:table-column-properties style:column-width="3.8438in"/>
    </style:style>
    <style:style style:name="Table9.1" style:family="table-row">
      <style:table-row-properties fo:keep-together="auto"/>
    </style:style>
    <style:style style:name="Table9.A1" style:family="table-cell">
      <style:table-cell-properties fo:padding="0.0382in" fo:border-left="0.5pt solid #000000" fo:border-right="none" fo:border-top="0.5pt solid #000000" fo:border-bottom="none"/>
    </style:style>
    <style:style style:name="Table9.B1" style:family="table-cell">
      <style:table-cell-properties fo:padding="0.0382in" fo:border-left="0.5pt solid #000000" fo:border-right="0.5pt solid #000000" fo:border-top="0.5pt solid #000000" fo:border-bottom="none"/>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7.6979in" fo:margin-left="0in" fo:margin-top="0in" fo:margin-bottom="0in" table:align="left" style:writing-mode="lr-tb"/>
    </style:style>
    <style:style style:name="Table10.A" style:family="table-column">
      <style:table-column-properties style:column-width="3.8542in"/>
    </style:style>
    <style:style style:name="Table10.B" style:family="table-column">
      <style:table-column-properties style:column-width="3.8438in"/>
    </style:style>
    <style:style style:name="Table10.1" style:family="table-row">
      <style:table-row-properties fo:keep-together="auto"/>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7.6979in" fo:margin-left="0in" fo:margin-top="0in" fo:margin-bottom="0in" table:align="left" style:writing-mode="lr-tb"/>
    </style:style>
    <style:style style:name="Table11.A" style:family="table-column">
      <style:table-column-properties style:column-width="3.8542in"/>
    </style:style>
    <style:style style:name="Table11.B" style:family="table-column">
      <style:table-column-properties style:column-width="3.8438in"/>
    </style:style>
    <style:style style:name="Table11.1" style:family="table-row">
      <style:table-row-properties fo:keep-together="auto"/>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style:vertical-align="middle"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7.6979in" fo:margin-left="0in" fo:margin-top="0in" fo:margin-bottom="0in" table:align="left" style:writing-mode="lr-tb"/>
    </style:style>
    <style:style style:name="Table12.A" style:family="table-column">
      <style:table-column-properties style:column-width="3.8542in"/>
    </style:style>
    <style:style style:name="Table12.B" style:family="table-column">
      <style:table-column-properties style:column-width="3.8438in"/>
    </style:style>
    <style:style style:name="Table12.1" style:family="table-row">
      <style:table-row-properties fo:keep-together="auto"/>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style:vertical-align="middle"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8in" style:rel-width="100%" fo:margin-left="0in" fo:margin-top="0in" fo:margin-bottom="0in" table:align="left" style:writing-mode="lr-tb"/>
    </style:style>
    <style:style style:name="Table13.A" style:family="table-column">
      <style:table-column-properties style:column-width="4in" style:rel-column-width="32767*"/>
    </style:style>
    <style:style style:name="Table13.1" style:family="table-row">
      <style:table-row-properties fo:keep-together="auto"/>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8in" style:rel-width="100%" fo:margin-left="0in" fo:margin-top="0in" fo:margin-bottom="0in" table:align="left" style:writing-mode="lr-tb"/>
    </style:style>
    <style:style style:name="Table14.A" style:family="table-column">
      <style:table-column-properties style:column-width="4in" style:rel-column-width="32767*"/>
    </style:style>
    <style:style style:name="Table14.1" style:family="table-row">
      <style:table-row-properties fo:keep-together="auto"/>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8in" style:rel-width="100%" fo:margin-left="0in" fo:margin-top="0in" fo:margin-bottom="0in" table:align="left" style:writing-mode="lr-tb"/>
    </style:style>
    <style:style style:name="Table15.A" style:family="table-column">
      <style:table-column-properties style:column-width="4in" style:rel-column-width="32767*"/>
    </style:style>
    <style:style style:name="Table15.1" style:family="table-row">
      <style:table-row-properties fo:keep-together="auto"/>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8in" style:rel-width="100%" fo:margin-left="0in" fo:margin-top="0in" fo:margin-bottom="0in" table:align="left" style:writing-mode="lr-tb"/>
    </style:style>
    <style:style style:name="Table16.A" style:family="table-column">
      <style:table-column-properties style:column-width="4in" style:rel-column-width="32767*"/>
    </style:style>
    <style:style style:name="Table16.1" style:family="table-row">
      <style:table-row-properties fo:keep-together="auto"/>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writing-mode="lr-tb"/>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writing-mode="lr-tb"/>
      <style:text-properties fo:font-size="12pt" style:font-size-asian="12pt" style:font-size-complex="12pt"/>
    </style:style>
    <style:style style:name="P4" style:family="paragraph" style:parent-style-name="Standard">
      <style:paragraph-properties fo:text-align="center" style:justify-single-word="false" style:writing-mode="lr-tb"/>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left" style:justify-single-word="false" style:writing-mode="lr-tb"/>
      <style:text-properties fo:font-size="12pt" style:font-size-asian="12pt" style:font-size-complex="12pt"/>
    </style:style>
    <style:style style:name="P7" style:family="paragraph" style:parent-style-name="Standard">
      <style:paragraph-properties fo:text-align="left" style:justify-single-word="false" style:writing-mode="lr-tb"/>
    </style:style>
    <style:style style:name="P8" style:family="paragraph" style:parent-style-name="Table_20_Contents">
      <style:paragraph-properties fo:text-align="center" style:justify-single-word="false" fo:orphans="0" fo:widows="0"/>
      <style:text-properties fo:font-weight="bold" style:font-weight-asian="bold" style:font-weight-complex="bold"/>
    </style:style>
    <style:style style:name="P9" style:family="paragraph" style:parent-style-name="Standard">
      <style:paragraph-properties fo:text-align="left" style:justify-single-word="false" fo:orphans="0" fo:widows="0" style:writing-mode="lr-tb"/>
    </style:style>
    <style:style style:name="P10" style:family="paragraph" style:parent-style-name="Table_20_Contents">
      <style:paragraph-properties fo:orphans="0" fo:widows="0"/>
    </style:style>
    <style:style style:name="P11" style:family="paragraph" style:parent-style-name="Standard">
      <style:paragraph-properties fo:text-align="left" style:justify-single-word="false" fo:orphans="0" fo:widows="0" style:writing-mode="lr-tb"/>
      <style:text-properties fo:font-size="12pt" style:font-size-asian="12pt" style:font-size-complex="12pt"/>
    </style:style>
    <style:style style:name="P12" style:family="paragraph" style:parent-style-name="Standard">
      <style:paragraph-properties fo:text-align="left" style:justify-single-word="false"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left" style:justify-single-word="false" fo:break-before="page"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margin-left="0in" fo:margin-right="0in" fo:text-align="center" style:justify-single-word="false" fo:orphans="0" fo:widows="0" fo:text-indent="0in" style:auto-text-indent="false" style:writing-mode="lr-tb"/>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fo:orphans="0" fo:widows="0" style:writing-mode="lr-tb"/>
      <style:text-properties fo:font-size="12pt" fo:font-weight="bold" style:font-size-asian="12pt" style:font-weight-asian="bold" style:font-size-complex="12pt" style:font-weight-complex="bold"/>
    </style:style>
    <style:style style:name="P16" style:family="paragraph" style:parent-style-name="Table_20_Contents">
      <style:paragraph-properties fo:margin-left="0in" fo:margin-right="0in" fo:text-align="center" style:justify-single-word="false" fo:orphans="0" fo:widows="0" fo:text-indent="0in" style:auto-text-indent="false" style:writing-mode="lr-tb"/>
    </style:style>
    <style:style style:name="P17" style:family="paragraph" style:parent-style-name="Table_20_Contents">
      <style:paragraph-properties fo:text-align="left" style:justify-single-word="false" fo:orphans="0" fo:widows="0" style:writing-mode="lr-tb"/>
      <style:text-properties fo:font-size="12pt" style:font-size-asian="12pt" style:font-size-complex="12pt"/>
    </style:style>
    <style:style style:name="P18" style:family="paragraph" style:parent-style-name="Standard">
      <style:paragraph-properties fo:text-align="left" style:justify-single-word="false" style:writing-mode="lr-tb"/>
      <style:text-properties fo:font-size="12pt" fo:font-weight="bold" style:font-size-asian="12pt" style:font-weight-asian="bold" style:font-size-complex="12pt" style:font-weight-complex="bold"/>
    </style:style>
    <style:style style:name="P19" style:family="paragraph" style:parent-style-name="Standard" style:list-style-name="WWNum1">
      <style:paragraph-properties fo:text-align="left" style:justify-single-word="false" style:writing-mode="lr-tb"/>
      <style:text-properties fo:font-size="12pt" style:font-size-asian="12pt" style:font-size-complex="12pt"/>
    </style:style>
    <style:style style:name="P20" style:family="paragraph" style:parent-style-name="Standard">
      <style:paragraph-properties fo:text-align="center" style:justify-single-word="false" style:writing-mode="lr-tb"/>
      <style:text-properties fo:font-style="normal" style:font-style-asian="normal" style:font-style-complex="normal"/>
    </style:style>
    <style:style style:name="P21" style:family="paragraph" style:parent-style-name="Standard">
      <style:paragraph-properties fo:text-align="left" style:justify-single-word="false" style:writing-mode="lr-tb"/>
      <style:text-properties fo:font-style="normal" style:font-style-asian="normal" style:font-style-complex="normal"/>
    </style:style>
    <style:style style:name="P22" style:family="paragraph" style:parent-style-name="Standard">
      <style:paragraph-properties fo:text-align="center" style:justify-single-word="false" style:writing-mode="lr-tb"/>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text-align="center" style:justify-single-word="false" fo:orphans="0" fo:widows="0" style:writing-mode="lr-tb"/>
      <style:text-properties fo:font-size="12pt" fo:font-weight="bold" style:font-size-asian="12pt" style:font-weight-asian="bold" style:font-size-complex="12pt" style:font-weight-complex="bold"/>
    </style:style>
    <style:style style:name="P24" style:family="paragraph" style:parent-style-name="Standard">
      <style:paragraph-properties fo:text-align="center" style:justify-single-word="false" fo:break-before="page" style:writing-mode="lr-tb"/>
    </style:style>
    <style:style style:name="P25" style:family="paragraph" style:parent-style-name="Standard" style:list-style-name="WWNum3">
      <style:paragraph-properties fo:text-align="left" style:justify-single-word="false" style:writing-mode="lr-tb"/>
      <style:text-properties fo:font-size="12pt" style:font-size-asian="12pt" style:font-size-complex="12pt"/>
    </style:style>
    <style:style style:name="P26" style:family="paragraph" style:parent-style-name="Standard">
      <style:paragraph-properties fo:text-align="left" style:justify-single-word="false" style:writing-mode="lr-tb"/>
      <style:text-properties fo:font-size="12pt" fo:font-style="normal" style:font-size-asian="12pt" style:font-style-asian="normal" style:font-size-complex="12pt" style:font-style-complex="normal"/>
    </style:style>
    <style:style style:name="P27" style:family="paragraph" style:parent-style-name="Standard">
      <style:paragraph-properties fo:text-align="center" style:justify-single-word="false" style:writing-mode="lr-tb"/>
      <style:text-properties fo:font-size="12pt" fo:font-style="normal" style:font-size-asian="12pt" style:font-style-asian="normal" style:font-size-complex="12pt" style:font-style-complex="normal"/>
    </style:style>
    <style:style style:name="P28" style:family="paragraph" style:parent-style-name="Standard">
      <style:paragraph-properties fo:text-align="center" style:justify-single-word="false" style:writing-mode="lr-tb"/>
      <style:text-properties fo:font-size="12pt" fo:font-style="normal" style:text-underline-style="solid" style:text-underline-width="auto" style:text-underline-color="font-color" style:font-size-asian="12pt" style:font-style-asian="normal" style:font-size-complex="12pt" style:font-style-complex="normal"/>
    </style:style>
    <style:style style:name="P29" style:family="paragraph" style:parent-style-name="Standard">
      <style:paragraph-properties fo:text-align="left" style:justify-single-word="false" fo:break-before="page" style:writing-mode="lr-tb"/>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WWNum2">
      <style:paragraph-properties fo:text-align="left" style:justify-single-word="false" style:writing-mode="lr-tb"/>
      <style:text-properties fo:font-size="12pt" style:font-size-asian="12pt" style:font-size-complex="12pt"/>
    </style:style>
    <style:style style:name="P31" style:family="paragraph" style:parent-style-name="Standard">
      <style:paragraph-properties fo:text-align="center" style:justify-single-word="false" style:writing-mode="lr-tb"/>
      <style:text-properties style:text-underline-style="solid" style:text-underline-width="auto" style:text-underline-color="font-color" fo:font-weight="normal" style:font-weight-asian="normal" style:font-weight-complex="normal"/>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style:text-underline-style="solid" style:text-underline-width="auto" style:text-underline-color="font-color" fo:font-weight="bold" style:font-weight-asian="bold" style:font-weight-complex="bold"/>
    </style:style>
    <style:style style:name="P34" style:family="paragraph" style:parent-style-name="Standard">
      <style:paragraph-properties fo:break-before="page" style:writing-mode="lr-tb"/>
      <style:text-properties style:text-underline-style="solid" style:text-underline-width="auto" style:text-underline-color="font-color" fo:font-weight="bold" style:font-weight-asian="bold" style:font-weight-complex="bold"/>
    </style:style>
    <style:style style:name="P35" style:family="paragraph" style:parent-style-name="Table_20_Contents">
      <style:paragraph-properties fo:text-align="center" style:justify-single-word="false" fo:orphans="0" fo:widows="0"/>
      <style:text-properties fo:font-variant="normal" fo:text-transform="none" fo:color="#627b9f" loext:opacity="100%" style:font-name="blbGentium" fo:font-size="20pt" fo:letter-spacing="normal" fo:font-style="normal" fo:font-weight="bold" style:font-size-asian="20pt" style:font-style-asian="normal" style:font-weight-asian="bold" style:font-size-complex="20pt"/>
    </style:style>
    <style:style style:name="P36" style:family="paragraph" style:parent-style-name="Table_20_Contents">
      <style:paragraph-properties fo:text-align="center" style:justify-single-word="false" fo:orphans="0" fo:widows="0"/>
    </style:style>
    <style:style style:name="P37" style:family="paragraph" style:parent-style-name="Standard">
      <style:paragraph-properties style:writing-mode="lr-tb"/>
      <style:text-properties fo:font-weight="bold" style:font-weight-asian="bold" style:font-weight-complex="bold"/>
    </style:style>
    <style:style style:name="P38" style:family="paragraph" style:parent-style-name="Standard" style:list-style-name="WWNum4">
      <style:paragraph-properties style:writing-mode="lr-tb"/>
    </style:style>
    <style:style style:name="P39" style:family="paragraph" style:parent-style-name="Standard" style:list-style-name="WWNum5">
      <style:paragraph-properties style:writing-mode="lr-tb"/>
    </style:style>
    <style:style style:name="P40" style:family="paragraph" style:parent-style-name="Standard">
      <style:paragraph-properties fo:text-align="center" style:justify-single-word="false" style:writing-mode="lr-tb"/>
      <style:text-properties fo:font-style="normal" style:text-underline-style="solid" style:text-underline-width="auto" style:text-underline-color="font-color" style:font-style-asian="normal" style:font-style-complex="normal"/>
    </style:style>
    <style:style style:name="P41" style:family="paragraph" style:parent-style-name="Standard">
      <style:paragraph-properties fo:break-before="page" style:writing-mode="lr-tb"/>
      <style:text-properties fo:font-weight="bold" style:font-weight-asian="bold" style:font-weight-complex="bold"/>
    </style:style>
    <style:style style:name="P42" style:family="paragraph" style:parent-style-name="Standard">
      <style:paragraph-properties fo:text-align="center" style:justify-single-word="false" style:writing-mode="lr-tb"/>
      <style:text-properties style:text-underline-style="solid" style:text-underline-width="auto" style:text-underline-color="font-color"/>
    </style:style>
    <style:style style:name="P43" style:family="paragraph" style:parent-style-name="Standard">
      <style:paragraph-properties fo:text-align="left" style:justify-single-word="false" style:writing-mode="lr-tb"/>
      <style:text-properties fo:color="#c9211e" loext:opacity="100%"/>
    </style:style>
    <style:style style:name="P44" style:family="paragraph" style:parent-style-name="Standard">
      <style:paragraph-properties fo:text-align="center" style:justify-single-word="false" style:writing-mode="lr-tb"/>
      <style:text-properties fo:font-size="12pt" style:text-underline-style="none" style:font-size-asian="12pt" style:font-size-complex="12pt"/>
    </style:style>
    <style:style style:name="P45" style:family="paragraph" style:parent-style-name="Standard">
      <style:paragraph-properties style:writing-mode="lr-tb"/>
      <style:text-properties fo:font-size="12pt" style:font-size-asian="12pt" style:font-size-complex="12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left" style:justify-single-word="false"/>
    </style:style>
    <style:style style:name="P48" style:family="paragraph" style:parent-style-name="Standard">
      <style:paragraph-properties fo:text-align="center" style:justify-single-word="false"/>
      <style:text-properties style:text-underline-style="solid" style:text-underline-width="auto" style:text-underline-color="font-color"/>
    </style:style>
    <style:style style:name="P49" style:family="paragraph" style:parent-style-name="Standard">
      <style:paragraph-properties fo:text-align="left" style:justify-single-word="false"/>
      <style:text-properties style:text-underline-style="none"/>
    </style:style>
    <style:style style:name="P50" style:family="paragraph" style:parent-style-name="Standard">
      <style:paragraph-properties fo:text-align="left" style:justify-single-word="false" fo:break-before="page"/>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text-align="center" style:justify-single-word="false" fo:break-before="page"/>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variant="normal" fo:text-transform="none" fo:color="#627b9f" loext:opacity="100%" fo:font-size="24pt" fo:letter-spacing="normal" style:font-size-asian="24pt" style:font-family-complex="blbHebrew" style:font-family-generic-complex="system" style:font-pitch-complex="variable" style:font-size-complex="24pt" style:font-style-complex="normal" style:font-weight-complex="bold"/>
    </style:style>
    <style:style style:name="T6" style:family="text">
      <style:text-properties fo:font-variant="normal" fo:text-transform="none" fo:color="#627b9f" loext:opacity="100%" fo:font-size="12pt" fo:letter-spacing="normal" style:font-size-asian="12pt" style:font-family-complex="blbHebrew" style:font-family-generic-complex="system" style:font-pitch-complex="variable" style:font-size-complex="12pt" style:font-style-complex="normal"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627b9f" loext:opacity="100%" style:font-name="blbGentium" fo:font-size="24pt" fo:letter-spacing="normal" fo:font-style="normal" fo:font-weight="bold" style:font-size-asian="24pt" style:font-style-asian="normal" style:font-weight-asian="bold" style:font-family-complex="blbHebrew" style:font-family-generic-complex="system" style:font-pitch-complex="variable" style:font-size-complex="24pt" style:font-style-complex="normal" style:font-weight-complex="bold"/>
    </style:style>
    <style:style style:name="T13" style:family="text">
      <style:text-properties style:text-position="super 58%"/>
    </style:style>
    <style:style style:name="T14" style:family="text">
      <style:text-properties fo:font-weight="bold" style:font-weight-asian="bold" style:font-weight-complex="bold"/>
    </style:style>
    <style:style style:name="T15" style:family="text">
      <style:text-properties fo:font-variant="normal" fo:text-transform="none" fo:color="#627b9f" loext:opacity="100%" style:font-name="blbGentium" fo:font-size="26.5pt" fo:letter-spacing="normal" fo:font-style="normal" fo:font-weight="bold" style:font-size-asian="26.5pt" style:font-style-asian="normal" style:font-weight-asian="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c9211e" loext:opacity="100%"/>
    </style:style>
    <style:style style:name="T19"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0" style:family="text">
      <style:text-properties style:text-underline-style="solid" style:text-underline-width="auto" style:text-underline-color="font-color"/>
    </style:style>
    <style:style style:name="T2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1:1</text:p>
      <text:p text:style-name="P2">In the beginning was the Word, and the Word was with God, and the Word was God.</text:p>
      <text:p text:style-name="P3"/>
      <text:p text:style-name="P4">Malachi 3:6a</text:p>
      <text:p text:style-name="P5">For I am the LORD, I change not;</text:p>
      <text:p text:style-name="P6"/>
      <text:p text:style-name="P7"><text:span text:style-name="T1">The King James version of the Bible uses for its translation what is referred to as “Early Modern English” (circa late 15</text:span><text:span text:style-name="T2">th</text:span><text:span text:style-name="T1"> century to mid-to-late 17</text:span><text:span text:style-name="T2">th</text:span><text:span text:style-name="T1"> century). While the definitions and common usages of those words have remained the same since that time the English language has changed significantly since then such that it is now comparatively referred to as “Modern English.”</text:span></text:p>
      <text:p text:style-name="P6"/>
      <text:p text:style-name="P6">This document will present a minuscule sample of the evidence of those changes in a concise, comparative format. Due to a conscious attempt of the author to minimize and/or avoid solicitation and prejudice the reader will be required to observe carefully, research, and come to their own conclusions. A very small amount of guidance will be provided in an attempt to stimulate the readers curiosity.</text:p>
      <text:p text:style-name="P6"/>
      <text:p text:style-name="P6">Information from some sources has been removed (eg. example sentences) and/or reformatted to both fit this format more elegantly and to be easier to digest. Below is a table of all the tools cited and used and the reader is encouraged to explore each resource individually for more information and especially for clarification on the acronyms, symbols, and styles particular to each resource which will not be explained in this document.</text:p>
      <text:p text:style-name="P6"/>
      <text:p text:style-name="P6">It is assumed that the reader already understands basic English language structure (eg. noun, verb, intransitive) and also common Bible study reference styles such as Strongs numbers for both Hebrew and Greek (eg. H4767, G190), Strongs definitions (eg. the meaning of an “X” symbol), and at least one style of Bible book, chapter, and verse shorthand notation (eg. Genesis 7:7-9).</text:p>
      <text:p text:style-name="P6"/>
      <text:p text:style-name="P6">The one resource used to create this document that is not widely available (custom Bible search tool) can easily be replaced by any number of freely available alternatives including but not limited to other resources in the table.</text:p>
      <text:p text:style-name="P6"/>
      <table:table table:name="Table1" table:style-name="Table1">
        <table:table-column table:style-name="Table1.A"/>
        <table:table-column table:style-name="Table1.B"/>
        <table:table-row table:style-name="Table1.1">
          <table:table-cell table:style-name="Table1.A1" office:value-type="string">
            <text:p text:style-name="P8">Resource</text:p>
          </table:table-cell>
          <table:table-cell table:style-name="Table1.B1" office:value-type="string">
            <text:p text:style-name="P8">Purpose</text:p>
          </table:table-cell>
        </table:table-row>
        <table:table-row table:style-name="Table1.1">
          <table:table-cell table:style-name="Table1.A2" office:value-type="string">
            <text:p text:style-name="P9"><text:span text:style-name="T1">Merriam-Webster Dictionary</text:span><text:span text:style-name="T3"> 2023</text:span></text:p>
            <text:p text:style-name="P9"><text:a xlink:type="simple" xlink:href="http://www.merriam-webster.com/" text:style-name="Internet_20_link" text:visited-style-name="Visited_20_Internet_20_Link"><text:span text:style-name="Internet_20_link"><text:span text:style-name="T1">www.merriam-webster.com</text:span></text:span></text:a></text:p>
          </table:table-cell>
          <table:table-cell table:style-name="Table1.B2" office:value-type="string">
            <text:p text:style-name="P10">Modern English definitions</text:p>
          </table:table-cell>
        </table:table-row>
        <table:table-row table:style-name="Table1.1">
          <table:table-cell table:style-name="Table1.A2" office:value-type="string">
            <text:p text:style-name="P11">Noah Websters 1828 Dictionary </text:p>
            <text:p text:style-name="P11">ISBN: 978-0-912498-03-4</text:p>
          </table:table-cell>
          <table:table-cell table:style-name="Table1.B2" office:value-type="string">
            <text:p text:style-name="P10">Early Modern English definitions</text:p>
          </table:table-cell>
        </table:table-row>
        <table:table-row table:style-name="Table1.1">
          <table:table-cell table:style-name="Table1.A2" office:value-type="string">
            <text:p text:style-name="P9"><text:span text:style-name="T1">English-Hebrew/Greek Interlinear KJV Bible </text:span><text:a xlink:type="simple" xlink:href="http://www.blueletterbible.org/" text:style-name="Internet_20_link" text:visited-style-name="Visited_20_Internet_20_Link"><text:span text:style-name="Internet_20_link"><text:span text:style-name="T1">www.blueletterbible.org</text:span></text:span></text:a></text:p>
          </table:table-cell>
          <table:table-cell table:style-name="Table1.B2" office:value-type="string">
            <text:p text:style-name="P10">Hebrew/Greek word identification, Strongs definitions, Hebrew/Greek word usage counts, Hebrew/Greek word spellings and pronunciations</text:p>
          </table:table-cell>
        </table:table-row>
        <table:table-row table:style-name="Table1.1">
          <table:table-cell table:style-name="Table1.A2" office:value-type="string">
            <text:p text:style-name="P11">Strongs comprehensive concordance of the Bible</text:p>
            <text:p text:style-name="P11">ISBN: 0-529-06334-4</text:p>
          </table:table-cell>
          <table:table-cell table:style-name="Table1.B2" office:value-type="string">
            <text:p text:style-name="P10">Hebrew/Greek word identification, Strongs definitions, Hebrew/Greek word usage counts, Hebrew/Greek word spellings and pronunciations</text:p>
          </table:table-cell>
        </table:table-row>
        <table:table-row table:style-name="Table1.1">
          <table:table-cell table:style-name="Table1.A2" office:value-type="string">
            <text:p text:style-name="P11">“Bible search tool” Custom software written by me that searches and parses the King James version Bible (Cambridge) in a variety of ways.</text:p>
          </table:table-cell>
          <table:table-cell table:style-name="Table1.B2" office:value-type="string">
            <text:p text:style-name="P10">English word counts, Verse references</text:p>
          </table:table-cell>
        </table:table-row>
      </table:table>
      <text:p text:style-name="P12"/>
      <text:p text:style-name="P13">Genesis 1:28</text:p>
      <text:p text:style-name="P7"><text:span text:style-name="T1">And God blessed them, and God said unto them, Be fruitful, and multiply, and </text:span><text:span text:style-name="T4">replenish</text:span><text:span text:style-name="T1"> (H4390) the earth, and subdue it: and have dominion over the fish of the sea, and over the fowl of the air, and over every living thing that moveth upon the earth.</text:span></text:p>
      <text:p text:style-name="P6"/>
      <text:p text:style-name="P6">NOTE: the English word “replenish” appears twice in the Bible and this is the first occurrence. The English word “replenished” appears five times in the Bible. Neither replenish/replenished appears in the New Testament.</text:p>
      <text:p text:style-name="P6"/>
      <table:table table:name="Table2" table:style-name="Table2">
        <table:table-column table:style-name="Table2.A" table:number-columns-repeated="2"/>
        <table:table-row table:style-name="Table2.1">
          <table:table-cell table:style-name="Table2.A1" office:value-type="string">
            <text:p text:style-name="P14">Replenish &amp; Replenished: H4390 (7x)</text:p>
          </table:table-cell>
          <table:table-cell table:style-name="Table2.B1" office:value-type="string">
            <text:p text:style-name="P15">Strongs definition</text:p>
          </table:table-cell>
        </table:table-row>
        <table:table-row table:style-name="Table2.1">
          <table:table-cell table:style-name="Table2.A2" office:value-type="string">
            <text:p text:style-name="P16"><text:span text:style-name="T5">מָלָא</text:span><text:span text:style-name="T6"> </text:span><text:span text:style-name="T1">(maw-lay')</text:span></text:p>
          </table:table-cell>
          <table:table-cell table:style-name="Table2.B2" office:value-type="string">
            <text:p text:style-name="P17">מָלֵא mâlêʼ, maw-lay'; or מָלָא mâlâʼ; (Esther 7:5), a primitive root; to fill or (intransitively) be full of, in a wide application (literally and figuratively):—accomplish, confirm, consecrate, be at an end, be expired, be fenced, fill, fulfil, (be, become, × draw, give in, go) full(-ly, -ly set, tale), (over-) flow, fulness, furnish, gather (selves, together), presume, replenish, satisfy, set, space, take a (hand-) full, have wholly.</text:p>
          </table:table-cell>
        </table:table-row>
      </table:table>
      <text:p text:style-name="P6"/>
      <text:p text:style-name="P5"><text:a xlink:type="simple" xlink:href="https://www.merriam-webster.com/dictionary/replenish"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replenish" text:style-name="Internet_20_link" text:visited-style-name="Visited_20_Internet_20_Link"><text:span text:style-name="Internet_20_link"><text:span text:style-name="T7">Replenish</text:span></text:span></text:a><text:span text:style-name="T1"> transitive verb</text:span></text:p>
      <text:p text:style-name="P6">1 : to fill or build up again</text:p>
      <text:p text:style-name="P6">2 a : to fill with persons or animals</text:p>
      <text:p text:style-name="P6"><text:s text:c="3"/>b : to fill with inspiration or power : NOURISH</text:p>
      <text:p text:style-name="P6"><text:s text:c="3"/>c archaic : to supply fully : PERFECT</text:p>
      <text:p text:style-name="P6"/>
      <text:p text:style-name="P18">Example Sentences</text:p>
      <text:list text:style-name="WWNum1">
        <text:list-item>
          <text:p text:style-name="P19">An efficient staff of workers replenished the trays of appetizers almost as quickly as guests emptied them.</text:p>
        </text:list-item>
        <text:list-item>
          <text:p text:style-name="P19">He replenished his supply of wood in preparation for the winter.</text:p>
        </text:list-item>
        <text:list-item>
          <text:p text:style-name="P19">Drink this—you need to replenish your fluids after your hike.</text:p>
        </text:list-item>
        <text:list-item>
          <text:p text:style-name="P19">plants that replenish soil nutrients</text:p>
        </text:list-item>
      </text:list>
      <text:p text:style-name="P6"/>
      <text:p text:style-name="P5"><text:span text:style-name="T8">Noah Webster 1828</text:span><text:span text:style-name="T1">:</text:span></text:p>
      <text:p text:style-name="P7"><text:span text:style-name="T7">REPLENISH</text:span><text:span text:style-name="T1">, v. t.</text:span></text:p>
      <text:p text:style-name="P6">[Norm. replener, to fill; It. Riempire; L. re and plenus, full.]</text:p>
      <text:p text:style-name="P7"><text:span text:style-name="T1">1. To fill; to stock with numbers or abundance. The magazines are </text:span><text:span text:style-name="T9">replenished</text:span><text:span text:style-name="T10"> with corn. The springs are </text:span><text:span text:style-name="T9">replenished</text:span><text:span text:style-name="T10"> with water.</text:span></text:p>
      <text:p text:style-name="P5"><text:span text:style-name="T10">Multiply and </text:span><text:span text:style-name="T9">replenish</text:span><text:span text:style-name="T10"> the earth. Gen. I.</text:span></text:p>
      <text:p text:style-name="P20"/>
      <text:p text:style-name="P7"><text:span text:style-name="T10">2. To finish; to complete. [</text:span><text:span text:style-name="T9">Not in use.</text:span><text:span text:style-name="T10">] </text:span><text:span text:style-name="T9">Shak</text:span><text:span text:style-name="T10">.</text:span></text:p>
      <text:p text:style-name="P21"/>
      <text:p text:style-name="P7"><text:span text:style-name="T11">REPLENISH</text:span><text:span text:style-name="T10">, v. i. To recover former fullness. </text:span><text:span text:style-name="T9">Bacon.</text:span></text:p>
      <text:p text:style-name="P6"/>
      <text:p text:style-name="P22">Comments</text:p>
      <text:p text:style-name="P6">Using the modern English dictionary and applying it to scripture means that we can form the hypothesis that the Earth was populated before the first man and woman were created (Genesis 1:27,28).</text:p>
      <text:p text:style-name="P6"/>
      <text:p text:style-name="P13">Psalms 37:14</text:p>
      <text:p text:style-name="P7"><text:span text:style-name="T1">The wicked have drawn out the sword, and have bent their bow, to cast down the poor and needy, and to slay such as be of upright </text:span><text:span text:style-name="T7">conversation</text:span> (H1870)<text:span text:style-name="T1">.</text:span></text:p>
      <text:p text:style-name="P6"/>
      <text:p text:style-name="P6">NOTE: the English word “conversation” appears 20 times in the Bible and this is the first occurrence.</text:p>
      <text:p text:style-name="P6"/>
      <table:table table:name="Table3" table:style-name="Table3">
        <table:table-column table:style-name="Table3.A" table:number-columns-repeated="2"/>
        <table:table-row table:style-name="Table3.1">
          <table:table-cell table:style-name="Table3.A1" office:value-type="string">
            <text:p text:style-name="P23">Conversation: H1870 (2x)</text:p>
          </table:table-cell>
          <table:table-cell table:style-name="Table3.B1" office:value-type="string">
            <text:p text:style-name="P15">Strongs definition</text:p>
          </table:table-cell>
        </table:table-row>
        <table:table-row table:style-name="Table3.1">
          <table:table-cell table:style-name="Table3.A2" office:value-type="string">
            <text:p text:style-name="P16"><text:span text:style-name="T5">דֶּרֶךְ</text:span><text:span text:style-name="T6"> </text:span><text:span text:style-name="T1">(deh'-rek)</text:span></text:p>
          </table:table-cell>
          <table:table-cell table:style-name="Table3.B2" office:value-type="string">
            <text:p text:style-name="P17">דֶּרֶךְ derek, deh'-rek; from H1869; a road (as trodden); figuratively, a course of life or mode of action, often adverb:—along, away, because of, by, conversation, custom, (east-) ward, journey, manner, passenger, through, toward, (high-) (path-) way(-side), whither(-soever).</text:p>
          </table:table-cell>
        </table:table-row>
      </table:table>
      <text:p text:style-name="P6"/>
      <table:table table:name="Table4" table:style-name="Table4">
        <table:table-column table:style-name="Table4.A" table:number-columns-repeated="2"/>
        <table:table-row table:style-name="Table4.1">
          <table:table-cell table:style-name="Table4.A1" office:value-type="string">
            <text:p text:style-name="P23">Conversation: G390 (2x)</text:p>
          </table:table-cell>
          <table:table-cell table:style-name="Table4.B1" office:value-type="string">
            <text:p text:style-name="P15">Strongs definition</text:p>
          </table:table-cell>
        </table:table-row>
        <table:table-row table:style-name="Table4.1">
          <table:table-cell table:style-name="Table4.A2" office:value-type="string">
            <text:p text:style-name="P16"><text:span text:style-name="T12">ἀναστρέφω</text:span><text:span text:style-name="T6"> </text:span><text:span text:style-name="T1">(an-as-tref'-o)</text:span></text:p>
          </table:table-cell>
          <table:table-cell table:style-name="Table4.B2" office:value-type="string">
            <text:p text:style-name="P17">ἀναστρέφω anastréphō, an-as-tref'-o; from G303 and G4762; to overturn; also to return; by implication, to busy oneself, i.e. remain, live:—abide, behave self, have conversation, live, overthrow, pass, return, be used.</text:p>
          </table:table-cell>
        </table:table-row>
      </table:table>
      <text:p text:style-name="P3"/>
      <table:table table:name="Table5" table:style-name="Table5">
        <table:table-column table:style-name="Table5.A" table:number-columns-repeated="2"/>
        <table:table-row table:style-name="Table5.1">
          <table:table-cell table:style-name="Table5.A1" office:value-type="string">
            <text:p text:style-name="P23">Conversation: G391 (12x)</text:p>
          </table:table-cell>
          <table:table-cell table:style-name="Table5.B1" office:value-type="string">
            <text:p text:style-name="P15">Strongs definition</text:p>
          </table:table-cell>
        </table:table-row>
        <table:table-row table:style-name="Table5.1">
          <table:table-cell table:style-name="Table5.A2" office:value-type="string">
            <text:p text:style-name="P16"><text:span text:style-name="T12">ἀναστροφή</text:span><text:span text:style-name="T6"> </text:span><text:span text:style-name="T1">(an-as-trof-ay')</text:span></text:p>
          </table:table-cell>
          <table:table-cell table:style-name="Table5.B2" office:value-type="string">
            <text:p text:style-name="P17">ἀναστροφή anastrophḗ, an-as-trof-ay'; from G390; behavior:—conversation.</text:p>
          </table:table-cell>
        </table:table-row>
      </table:table>
      <text:p text:style-name="P7"/>
      <table:table table:name="Table6" table:style-name="Table6">
        <table:table-column table:style-name="Table6.A" table:number-columns-repeated="2"/>
        <table:table-row table:style-name="Table6.1">
          <table:table-cell table:style-name="Table6.A1" office:value-type="string">
            <text:p text:style-name="P23">Conversation: G4175 (1x)</text:p>
          </table:table-cell>
          <table:table-cell table:style-name="Table6.B1" office:value-type="string">
            <text:p text:style-name="P15">Strongs definition</text:p>
          </table:table-cell>
        </table:table-row>
        <table:table-row table:style-name="Table6.1">
          <table:table-cell table:style-name="Table6.A2" office:value-type="string">
            <text:p text:style-name="P16"><text:span text:style-name="T12">πολίτευμα</text:span><text:span text:style-name="T6"> </text:span><text:span text:style-name="T1">(pol-it'-yoo-mah)</text:span></text:p>
          </table:table-cell>
          <table:table-cell table:style-name="Table6.B2" office:value-type="string">
            <text:p text:style-name="P17">πολίτευμα políteuma, pol-it'-yoo-mah; from G4176; a community, i.e. (abstractly) citizenship (figuratively):—conversation.</text:p>
          </table:table-cell>
        </table:table-row>
      </table:table>
      <text:p text:style-name="P7"/>
      <table:table table:name="Table7" table:style-name="Table7">
        <table:table-column table:style-name="Table7.A"/>
        <table:table-column table:style-name="Table7.B"/>
        <table:table-row table:style-name="Table7.1">
          <table:table-cell table:style-name="Table7.A1" office:value-type="string">
            <text:p text:style-name="P23">Conversation: G4176 (1x)</text:p>
          </table:table-cell>
          <table:table-cell table:style-name="Table7.B1" office:value-type="string">
            <text:p text:style-name="P15">Strongs definition</text:p>
          </table:table-cell>
        </table:table-row>
        <table:table-row table:style-name="Table7.1">
          <table:table-cell table:style-name="Table7.A2" office:value-type="string">
            <text:p text:style-name="P16"><text:span text:style-name="T12">πολιτεύομαι</text:span><text:span text:style-name="T6"> </text:span><text:span text:style-name="T1">(pol-it-yoo'-om-ahee)</text:span></text:p>
          </table:table-cell>
          <table:table-cell table:style-name="Table7.B2" office:value-type="string">
            <text:p text:style-name="P17">†πολιτεύομαι politeúomai, pol-it-yoo'-om-ahee; middle voice of a derivative of G4177; to behave as a citizen (figuratively):—let conversation be, live.</text:p>
          </table:table-cell>
        </table:table-row>
      </table:table>
      <text:p text:style-name="P6"/>
      <table:table table:name="Table8" table:style-name="Table8">
        <table:table-column table:style-name="Table8.A"/>
        <table:table-column table:style-name="Table8.B"/>
        <table:table-row table:style-name="Table8.1">
          <table:table-cell table:style-name="Table8.A1" office:value-type="string">
            <text:p text:style-name="P23">Conversation: G5158 (1x)</text:p>
          </table:table-cell>
          <table:table-cell table:style-name="Table8.B1" office:value-type="string">
            <text:p text:style-name="P15">Strongs definition</text:p>
          </table:table-cell>
        </table:table-row>
        <table:table-row table:style-name="Table8.1">
          <table:table-cell table:style-name="Table8.A2" office:value-type="string">
            <text:p text:style-name="P16"><text:span text:style-name="T12">τρόπος</text:span><text:span text:style-name="T6"> </text:span><text:span text:style-name="T1">(trop'-os)</text:span></text:p>
          </table:table-cell>
          <table:table-cell table:style-name="Table8.B2" office:value-type="string">
            <text:p text:style-name="P17">τρόπος trópos, trop'-os; from the same as G5157; a turn, i.e. (by implication) mode or style (especially with preposition or relative prefix as adverb, like); figuratively, deportment or character:—(even) as, conversation, (+ like) manner, (+ by any) means, way.</text:p>
          </table:table-cell>
        </table:table-row>
      </table:table>
      <text:p text:style-name="P6"/>
      <text:p text:style-name="P6"/>
      <text:p text:style-name="P24"><text:a xlink:type="simple" xlink:href="https://www.merriam-webster.com/dictionary/conversation"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conversation" text:style-name="Internet_20_link" text:visited-style-name="Visited_20_Internet_20_Link"><text:span text:style-name="Internet_20_link"><text:span text:style-name="T7">Conversation</text:span></text:span></text:a><text:span text:style-name="T1"> noun</text:span></text:p>
      <text:p text:style-name="P6">1 a (1) : oral exchange of sentiments, observations, opinions, or ideas</text:p>
      <text:p text:style-name="P6"><text:s text:c="6"/>(2) : an instance of such exchange : TALK</text:p>
      <text:p text:style-name="P6"><text:s text:c="3"/>b : an informal discussion of an issue by representatives of governments, institutions, or groups</text:p>
      <text:p text:style-name="P6">conversations among the senators</text:p>
      <text:p text:style-name="P6"><text:s text:c="3"/>c : an exchange similar to conversation</text:p>
      <text:p text:style-name="P6">2 obsolete : CONDUCT, BEHAVIOR</text:p>
      <text:p text:style-name="P6"/>
      <text:p text:style-name="P18">Example Sentences</text:p>
      <text:list text:style-name="WWNum3">
        <text:list-item>
          <text:p text:style-name="P25">Do you remember our conversation about that new movie?</text:p>
        </text:list-item>
        <text:list-item>
          <text:p text:style-name="P25">We got into a long conversation about his behavior.</text:p>
        </text:list-item>
        <text:list-item>
          <text:p text:style-name="P25">They were engaged in a lengthy conversation about politics.</text:p>
        </text:list-item>
        <text:list-item>
          <text:p text:style-name="P25">The topic came up in conversation.</text:p>
        </text:list-item>
      </text:list>
      <text:p text:style-name="P6"/>
      <text:p text:style-name="P5"><text:span text:style-name="T8">Noah Webster 1828</text:span><text:span text:style-name="T1">:</text:span></text:p>
      <text:p text:style-name="P7"><text:span text:style-name="T11">CONVERSATION</text:span><text:span text:style-name="T10">, n.</text:span></text:p>
      <text:p text:style-name="P26">1. General course of manners; behavior; deportment; especially as it respects morals.</text:p>
      <text:p text:style-name="P5"><text:span text:style-name="T10">Let your </text:span><text:span text:style-name="T9">conversation</text:span><text:span text:style-name="T10"> be as becometh the gospel. Phil i.</text:span></text:p>
      <text:p text:style-name="P5"><text:span text:style-name="T10">Be ye holy in all manner of </text:span><text:span text:style-name="T9">conversation</text:span><text:span text:style-name="T10">. 1 Pet. i.</text:span></text:p>
      <text:p text:style-name="P27"/>
      <text:p text:style-name="P7"><text:span text:style-name="T10">2. A keeping company; familiar intercourse; intimate fellowship or association; commerce in social life. Knowledge of men and manners is best acquired by </text:span><text:span text:style-name="T9">conversation</text:span><text:span text:style-name="T10"> with the best company.</text:span></text:p>
      <text:p text:style-name="P26"/>
      <text:p text:style-name="P7"><text:span text:style-name="T10">3. Intimate and familiar acquaintance; as a </text:span><text:span text:style-name="T9">conversation</text:span><text:span text:style-name="T10"> with books, or other object.</text:span></text:p>
      <text:p text:style-name="P26">4. Familiar discourse; general intercourse of sentiments; chat; unrestrained talk; opposed to a formal conference.</text:p>
      <text:p text:style-name="P5"><text:span text:style-name="T10">What I mentioned in </text:span><text:span text:style-name="T9">conversation</text:span><text:span text:style-name="T10"> was not a new thought. </text:span><text:span text:style-name="T9">Swift.</text:span></text:p>
      <text:p text:style-name="P27">[This is now the most general use of the word.]</text:p>
      <text:p text:style-name="P27"/>
      <text:p text:style-name="P28">Comments</text:p>
      <text:p text:style-name="P7">Note the exhaustive list of Hebrew and Greek words and definitions that were translated to the English word “conversation.” That is intentional so the reader can more easily compare each source. Also noteworthy, according to the modern English dictionary the only definition (2) that appears to resemble Biblical usage is stated as being “obsolete<text:span text:style-name="T13">1</text:span>.”</text:p>
      <text:p text:style-name="P7"/>
      <text:p text:style-name="P7"/>
      <text:p text:style-name="P7"/>
      <text:p text:style-name="P7"><text:span text:style-name="T13">1</text:span> <text:a xlink:type="simple" xlink:href="https://www.merriam-webster.com/dictionary/obsolete" text:style-name="Internet_20_link" text:visited-style-name="Visited_20_Internet_20_Link"><text:span text:style-name="Internet_20_link">Merriam-Websters 2023</text:span></text:a>: “Obsolete” definition 1a: “no longer in use or no longer useful”</text:p>
      <text:p text:style-name="P7"/>
      <text:p text:style-name="P29">Job 3:12</text:p>
      <text:p text:style-name="P7">Why did the knees <text:span text:style-name="T14">prevent</text:span> (H6923) me? or why the breasts that I should suck?</text:p>
      <text:p text:style-name="P7"/>
      <text:p text:style-name="P7">NOTE: the English word “prevent” appears 7 times in the Bible and this is the first occurrence.</text:p>
      <text:p text:style-name="P7"/>
      <table:table table:name="Table9" table:style-name="Table9">
        <table:table-column table:style-name="Table9.A"/>
        <table:table-column table:style-name="Table9.B"/>
        <table:table-row table:style-name="Table9.1">
          <table:table-cell table:style-name="Table9.A1" office:value-type="string">
            <text:p text:style-name="P23">Prevent/Prevented: H6923 (14x)</text:p>
          </table:table-cell>
          <table:table-cell table:style-name="Table9.B1" office:value-type="string">
            <text:p text:style-name="P15">Strongs definition</text:p>
          </table:table-cell>
        </table:table-row>
        <table:table-row table:style-name="Table9.1">
          <table:table-cell table:style-name="Table9.A2" office:value-type="string">
            <text:p text:style-name="P16"><text:span text:style-name="T12">קָדַם</text:span><text:span text:style-name="T6"> </text:span><text:span text:style-name="T1">(kaw-dam')</text:span></text:p>
          </table:table-cell>
          <table:table-cell table:style-name="Table9.B2" office:value-type="string">
            <text:p text:style-name="P17">קָדַם qâdam, kaw-dam'; a primitive root; to project (one self), i.e. precede; hence, to anticipate, hasten, meet (usually for help):—come (go, (flee)) before, disappoint, meet, prevent.</text:p>
          </table:table-cell>
        </table:table-row>
      </table:table>
      <text:p text:style-name="P7"/>
      <table:table table:name="Table10" table:style-name="Table10">
        <table:table-column table:style-name="Table10.A"/>
        <table:table-column table:style-name="Table10.B"/>
        <table:table-row table:style-name="Table10.1">
          <table:table-cell table:style-name="Table10.A1" office:value-type="string">
            <text:p text:style-name="P23">Prevent: G5348 (1x)</text:p>
          </table:table-cell>
          <table:table-cell table:style-name="Table10.B1" office:value-type="string">
            <text:p text:style-name="P15">Strongs definition</text:p>
          </table:table-cell>
        </table:table-row>
        <table:table-row table:style-name="Table10.1">
          <table:table-cell table:style-name="Table10.A2" office:value-type="string">
            <text:p text:style-name="P16"><text:span text:style-name="T12">φθάνω</text:span><text:span text:style-name="T6"> </text:span><text:span text:style-name="T1">(fthan'-o)</text:span></text:p>
          </table:table-cell>
          <table:table-cell table:style-name="Table10.B2" office:value-type="string">
            <text:p text:style-name="P17">φθάνω phthánō, fthan'-o; apparently a primary verb; to be beforehand, i.e. anticipate or precede; by extension, to have arrived at:—(already) attain, come, prevent.</text:p>
          </table:table-cell>
        </table:table-row>
      </table:table>
      <text:p text:style-name="P7"/>
      <table:table table:name="Table11" table:style-name="Table11">
        <table:table-column table:style-name="Table11.A"/>
        <table:table-column table:style-name="Table11.B"/>
        <table:table-row table:style-name="Table11.1">
          <table:table-cell table:style-name="Table11.A1" office:value-type="string">
            <text:p text:style-name="P23">Prevented: G4399 (1x)</text:p>
          </table:table-cell>
          <table:table-cell table:style-name="Table11.B1" office:value-type="string">
            <text:p text:style-name="P15">Strongs definition</text:p>
          </table:table-cell>
        </table:table-row>
        <table:table-row table:style-name="Table11.1">
          <table:table-cell table:style-name="Table11.A2" office:value-type="string">
            <text:p text:style-name="P16"><text:span text:style-name="T12">προφθάνω</text:span><text:span text:style-name="T6"> </text:span><text:span text:style-name="T1">(prof-than'-o)</text:span></text:p>
          </table:table-cell>
          <table:table-cell table:style-name="Table11.B2" office:value-type="string">
            <text:p text:style-name="P17">προφθάνω prophthánō, prof-than'-o; from G4253 and G5348; to get an earlier start of, i.e. anticipate:—prevent.</text:p>
          </table:table-cell>
        </table:table-row>
      </table:table>
      <text:p text:style-name="P5"><text:span text:style-name="Internet_20_link"/></text:p>
      <table:table table:name="Table12" table:style-name="Table12">
        <table:table-column table:style-name="Table12.A"/>
        <table:table-column table:style-name="Table12.B"/>
        <table:table-row table:style-name="Table12.1">
          <table:table-cell table:style-name="Table12.A1" office:value-type="string">
            <text:p text:style-name="P23">Prevented: G5348 (1x)</text:p>
          </table:table-cell>
          <table:table-cell table:style-name="Table12.B1" office:value-type="string">
            <text:p text:style-name="P15">Strongs definition</text:p>
          </table:table-cell>
        </table:table-row>
        <table:table-row table:style-name="Table12.1">
          <table:table-cell table:style-name="Table12.A2" office:value-type="string">
            <text:p text:style-name="P16"><text:span text:style-name="T12">φθάνω</text:span><text:span text:style-name="T6"> </text:span><text:span text:style-name="T1">(fthan'-o)</text:span></text:p>
          </table:table-cell>
          <table:table-cell table:style-name="Table12.B2" office:value-type="string">
            <text:p text:style-name="P17">φθάνω phthánō, fthan'-o; apparently a primary verb; to be beforehand, i.e. anticipate or precede; by extension, to have arrived at:—(already) attain, come, prevent.</text:p>
          </table:table-cell>
        </table:table-row>
      </table:table>
      <text:p text:style-name="P5"><text:span text:style-name="Internet_20_link"/></text:p>
      <text:p text:style-name="P5"><text:a xlink:type="simple" xlink:href="https://www.merriam-webster.com/dictionary/prevent"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prevent" text:style-name="Internet_20_link" text:visited-style-name="Visited_20_Internet_20_Link"><text:span text:style-name="Internet_20_link"><text:span text:style-name="T7">Prevent</text:span></text:span></text:a><text:span text:style-name="T1"> transitive verb</text:span></text:p>
      <text:p text:style-name="P6">1 : to keep from happening or existing</text:p>
      <text:p text:style-name="P6">2 : to hold or keep back : HINDER, STOP —often used with from</text:p>
      <text:p text:style-name="P6">3 : to deprive of power or hope of acting or succeeding</text:p>
      <text:p text:style-name="P6">4 archaic a: to be in readiness for (something, such as an occasion)</text:p>
      <text:p text:style-name="P6"><text:s text:c="15"/>b: to meet or satisfy in advance</text:p>
      <text:p text:style-name="P6"><text:s text:c="15"/>c: to act ahead of</text:p>
      <text:p text:style-name="P6"><text:s text:c="15"/>d: to go or arrive before</text:p>
      <text:p text:style-name="P6">intransitive verb</text:p>
      <text:p text:style-name="P6">: to interpose an obstacle</text:p>
      <text:p text:style-name="P6"/>
      <text:p text:style-name="P18">Example Sentences</text:p>
      <text:list text:style-name="WWNum2">
        <text:list-item>
          <text:p text:style-name="P30">Seatbelts in cars often prevent serious injuries.</text:p>
        </text:list-item>
        <text:list-item>
          <text:p text:style-name="P30">Can exercise and a healthy diet prevent heart disease?</text:p>
        </text:list-item>
        <text:list-item>
          <text:p text:style-name="P30">The accident could have been prevented.</text:p>
        </text:list-item>
        <text:list-item>
          <text:p text:style-name="P30">He grabbed my arm to prevent me from falling.</text:p>
        </text:list-item>
      </text:list>
      <text:p text:style-name="P3"/>
      <text:p text:style-name="P24"><text:span text:style-name="T8">Noah Webster 1828</text:span><text:span text:style-name="T1">:</text:span></text:p>
      <text:p text:style-name="P7"><text:span text:style-name="T11">PREVENT</text:span><text:span text:style-name="T10">, v. t. [It. Prevenire; Sp. Fr. Prevenir; L. prævenio, supra.]</text:span></text:p>
      <text:p text:style-name="P26">1. To go before; to precede.</text:p>
      <text:p text:style-name="P5"><text:span text:style-name="T10">I </text:span><text:span text:style-name="T9">prevented</text:span><text:span text:style-name="T10"> the dawning of the morning, and cried. Ps cxix</text:span></text:p>
      <text:p text:style-name="P27"/>
      <text:p text:style-name="P26">2. To precede, as something unexpected or unsought.</text:p>
      <text:p text:style-name="P5"><text:span text:style-name="T10">The days of my affliction </text:span><text:span text:style-name="T9">prevented</text:span><text:span text:style-name="T10"> me. Job xxx 2 Sam. xxxii [6, 19]</text:span></text:p>
      <text:p text:style-name="P27"/>
      <text:p text:style-name="P26">3. To go before; to precede; to favor by anticipation or by hindering distress or evil.</text:p>
      <text:p text:style-name="P5"><text:span text:style-name="T10">The God of my mercy shall </text:span><text:span text:style-name="T9">prevent</text:span><text:span text:style-name="T10"> me. PS lix.</text:span></text:p>
      <text:p text:style-name="P27"/>
      <text:p text:style-name="P31">Comments</text:p>
      <text:p text:style-name="P32">Take note of the prioritization of definition sources of each resource. Upon more thorough inspection you may notice that there is a common theme to each resource.</text:p>
      <text:p text:style-name="P33"/>
      <text:p text:style-name="P34">Acts 5:34</text:p>
      <text:p text:style-name="P32">Then stood there up one in the council, a Pharisee, named Gamaliel, a <text:span text:style-name="T14">doctor</text:span> (G3547) of the law, had in reputation among all the people, and commanded to put the apostles forth a little space;</text:p>
      <text:p text:style-name="P32"/>
      <table:table table:name="Table13" table:style-name="Table13">
        <table:table-column table:style-name="Table13.A" table:number-columns-repeated="2"/>
        <table:table-row table:style-name="Table13.1">
          <table:table-cell table:style-name="Table13.A1" office:value-type="string">
            <text:p text:style-name="P8">Doctor/Doctors: G3547 (2x)</text:p>
          </table:table-cell>
          <table:table-cell table:style-name="Table13.B1" office:value-type="string">
            <text:p text:style-name="P8">Strongs definition</text:p>
          </table:table-cell>
        </table:table-row>
        <table:table-row table:style-name="Table13.1">
          <table:table-cell table:style-name="Table13.A2" office:value-type="string">
            <text:p text:style-name="P35">Νομοδιδάσκαλος</text:p>
            <text:p text:style-name="P36">(nom-od-id-as'-kal-os)</text:p>
          </table:table-cell>
          <table:table-cell table:style-name="Table13.B2" office:value-type="string">
            <text:p text:style-name="P10">νομοδιδάσκαλος nomodidáskalos, nom-od-id-as'-kal-os; from G3551 and G1320; an expounder of the (Jewish) law, i.e. a Rabbi:—doctor (teacher) of the law.</text:p>
          </table:table-cell>
        </table:table-row>
      </table:table>
      <text:p text:style-name="P32"/>
      <table:table table:name="Table14" table:style-name="Table14">
        <table:table-column table:style-name="Table14.A" table:number-columns-repeated="2"/>
        <table:table-row table:style-name="Table14.1">
          <table:table-cell table:style-name="Table14.A1" office:value-type="string">
            <text:p text:style-name="P8">Doctors: G1320 (1x)</text:p>
          </table:table-cell>
          <table:table-cell table:style-name="Table14.B1" office:value-type="string">
            <text:p text:style-name="P8">Strongs definition</text:p>
          </table:table-cell>
        </table:table-row>
        <table:table-row table:style-name="Table14.1">
          <table:table-cell table:style-name="Table14.A2" office:value-type="string">
            <text:p text:style-name="P36"><text:span text:style-name="T15">Διδάσκαλος</text:span> (did-as'-kal-os)</text:p>
          </table:table-cell>
          <table:table-cell table:style-name="Table14.B2" office:value-type="string">
            <text:p text:style-name="P10">διδάσκαλος didáskalos, did-as'-kal-os; from G1321; an instructor (genitive case or specially):—doctor, master, teacher.</text:p>
          </table:table-cell>
        </table:table-row>
      </table:table>
      <text:p text:style-name="P5"><text:span text:style-name="Internet_20_link"/></text:p>
      <text:p text:style-name="P5"><text:a xlink:type="simple" xlink:href="https://www.merriam-webster.com/dictionary/doctor"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doctor" text:style-name="Internet_20_link" text:visited-style-name="Visited_20_Internet_20_Link"><text:span text:style-name="Internet_20_link"><text:span text:style-name="T7">Doctor</text:span></text:span></text:a><text:span text:style-name="T1"> noun</text:span></text:p>
      <text:p text:style-name="P6">1 a Christianity : an eminent theologian declared a sound expounder of doctrine by the Roman Catholic Church</text:p>
      <text:p text:style-name="P6"><text:s text:c="3"/>b : a learned or authoritative teacher</text:p>
      <text:p text:style-name="P6"><text:s text:c="3"/>c : a person who has earned one of the highest academic degrees (such as a PhD) conferred by a university</text:p>
      <text:p text:style-name="P6"><text:s text:c="3"/>d : a person awarded an honorary doctorate (such as an LLD or Litt D) by a college or university</text:p>
      <text:p text:style-name="P6">2 a : a person skilled or specializing in healing arts</text:p>
      <text:p text:style-name="P6"><text:s text:c="3"/>b : MEDICINE MAN</text:p>
      <text:p text:style-name="P6">3 a : material added (as to food) to produce a desired effect</text:p>
      <text:p text:style-name="P6"><text:s text:c="3"/>b : a blade (as of metal) for spreading a coating or scraping a surface</text:p>
      <text:p text:style-name="P6">4 : a person who restores, repairs, or fine-tunes things</text:p>
      <text:p text:style-name="P6"/>
      <text:p text:style-name="P7"><text:a xlink:type="simple" xlink:href="https://www.merriam-webster.com/dictionary/doctor" text:style-name="Internet_20_link" text:visited-style-name="Visited_20_Internet_20_Link"><text:span text:style-name="Internet_20_link"><text:span text:style-name="T7">Doctor</text:span></text:span></text:a><text:span text:style-name="T1"> transitive verb</text:span></text:p>
      <text:p text:style-name="P6">1 a : to give medical treatment to</text:p>
      <text:p text:style-name="P6"><text:s text:c="3"/>b : to restore to good condition : REPAIR</text:p>
      <text:p text:style-name="P6">2 a : to adapt or modify for a desired end by alteration or special treatment</text:p>
      <text:p text:style-name="P6"><text:s text:c="3"/>b : to alter deceptively</text:p>
      <text:p text:style-name="P6"/>
      <text:p text:style-name="P7"><text:span text:style-name="T7">Doctor</text:span><text:span text:style-name="T1"> intransitive verb</text:span></text:p>
      <text:p text:style-name="P6">1 : to practice medicine</text:p>
      <text:p text:style-name="P6">2 dialect : to take medicine</text:p>
      <text:p text:style-name="P6"/>
      <text:p text:style-name="P37">Example Sentences</text:p>
      <text:p text:style-name="P32">Noun</text:p>
      <text:list text:style-name="WWNum4">
        <text:list-item>
          <text:p text:style-name="P38">He needed medicine but refused to go to a doctor.</text:p>
        </text:list-item>
        <text:list-item>
          <text:p text:style-name="P38">She was under doctor's orders not to return to work.</text:p>
        </text:list-item>
        <text:list-item>
          <text:p text:style-name="P38">I saw her at the doctor's last week.</text:p>
        </text:list-item>
        <text:list-item>
          <text:p text:style-name="P38">How long will you be at the doctor?</text:p>
        </text:list-item>
        <text:list-item>
          <text:p text:style-name="P38">Most of the faculty members at this college are doctors in their fields.</text:p>
        </text:list-item>
        <text:list-item>
          <text:p text:style-name="P38">Dr. Smith, can you explain the exam requirements again?</text:p>
        </text:list-item>
      </text:list>
      <text:p text:style-name="P32">Verb</text:p>
      <text:list text:style-name="WWNum5">
        <text:list-item>
          <text:p text:style-name="P39">They were accused of doctoring the company's financial records.</text:p>
        </text:list-item>
        <text:list-item>
          <text:p text:style-name="P39">a doctored photo of the actress</text:p>
        </text:list-item>
        <text:list-item>
          <text:p text:style-name="P39">I think somebody doctored the punch.</text:p>
        </text:list-item>
        <text:list-item>
          <text:p text:style-name="P39">He had time to doctor his wounds.</text:p>
        </text:list-item>
        <text:list-item>
          <text:p text:style-name="P39">She doctored the sick child until the physician arrived.</text:p>
        </text:list-item>
      </text:list>
      <text:p text:style-name="P3"/>
      <text:p text:style-name="P24"><text:span text:style-name="T8">Noah Webster 1828</text:span><text:span text:style-name="T1">:</text:span></text:p>
      <text:p text:style-name="P26">DOCTOR, n. [L. from doceo, to teach]</text:p>
      <text:p text:style-name="P26">1. A teacher</text:p>
      <text:p text:style-name="P5">There stood up one in the council, a Pharisee, named Gamaliel, a <text:span text:style-name="T16">doctor</text:span><text:span text:style-name="T17"> of the law. Acts v.</text:span></text:p>
      <text:p text:style-name="P20"/>
      <text:p text:style-name="P7"><text:span text:style-name="T17">2. One who has passed all the degrees of a faculty, and is empowered to practice and teach it, as a </text:span><text:span text:style-name="T16">doctor</text:span><text:span text:style-name="T17"> in divinity, in physic, in law; or according to modern usage, a person who has received the highest degree in a faculty. The degree of </text:span><text:span text:style-name="T16">doctor</text:span><text:span text:style-name="T17"> is conferred by universities and colleges, as an honorary mark of literary distinction. It is also conferred on physicians, as a professional degree.</text:span></text:p>
      <text:p text:style-name="P21"/>
      <text:p text:style-name="P7"><text:span text:style-name="T17">3. A learned man; a man skilled in a profession; a man of erudition. </text:span><text:span text:style-name="T16">Dryden. Digby.</text:span></text:p>
      <text:p text:style-name="P21">4. A physician; one whose occupation is to cure diseases.</text:p>
      <text:p text:style-name="P7"><text:span text:style-name="T17">5. The title, </text:span><text:span text:style-name="T16">doctor</text:span><text:span text:style-name="T17">, is given to a certain fathers of the church whose opinions are received as authorities, and in the Greek church, it is given to a particular officer who interprets the scriptures. </text:span><text:span text:style-name="T16">Encyc. Doctors Commons,</text:span><text:span text:style-name="T17"> the college of civilians in London.</text:span></text:p>
      <text:p text:style-name="P21"/>
      <text:p text:style-name="P21">DOCTOR, v. t.</text:p>
      <text:p text:style-name="P7"><text:span text:style-name="T17">1. To apply medicines for the cure of diseases [</text:span><text:span text:style-name="T16">A popular use of this word, but not elegant.</text:span><text:span text:style-name="T17">]</text:span></text:p>
      <text:p text:style-name="P21"/>
      <text:p text:style-name="P21">DOCTOR, v. i.</text:p>
      <text:p text:style-name="P7"><text:span text:style-name="T17">1. To practice physic. [</text:span><text:span text:style-name="T16">Not elegant.</text:span><text:span text:style-name="T17">]</text:span></text:p>
      <text:p text:style-name="P21"/>
      <text:p text:style-name="P40">Comments</text:p>
      <text:p text:style-name="P32">Note how the modern English dictionary directly associates Christianity with the Roman Catholic church (1a). Additionally, it is stated that those theologians are “eminent.<text:span text:style-name="T13">1</text:span>”</text:p>
      <text:p text:style-name="P32"/>
      <text:p text:style-name="P32"/>
      <text:p text:style-name="P32"/>
      <text:p text:style-name="P32"><text:span text:style-name="T13">1 </text:span><text:a xlink:type="simple" xlink:href="https://www.merriam-webster.com/dictionary/eminent" text:style-name="Internet_20_link" text:visited-style-name="Visited_20_Internet_20_Link"><text:span text:style-name="Internet_20_link">Merriam-Websters definition</text:span></text:a>:</text:p>
      <text:p text:style-name="P32">eminent adjective</text:p>
      <text:p text:style-name="P32">1 : exhibiting eminence especially in standing above others in some quality or position : PROMINENT</text:p>
      <text:p text:style-name="P32">2 : standing out so as to be readily perceived or noted : CONSPICUOUS</text:p>
      <text:p text:style-name="P32">3 : jutting out : PROJECTING</text:p>
      <text:p text:style-name="P32"/>
      <text:p text:style-name="P41">Genesis 2:24</text:p>
      <text:p text:style-name="P32">Therefore shall a man leave his <text:span text:style-name="T14">father</text:span> (H1) and his mother, and shall cleave unto his wife: and they shall be one flesh.</text:p>
      <text:p text:style-name="P32"/>
      <text:p text:style-name="P42">Comments</text:p>
      <text:p text:style-name="P32">This one is far more complicated than it may initially appear and to document all of it here is beyond the scope of this document. Certain words have been highlighted in red to draw your attention and to elicit careful consideration.</text:p>
      <text:p text:style-name="P32"/>
      <text:p text:style-name="P5"><text:a xlink:type="simple" xlink:href="https://www.merriam-webster.com/dictionary/father" text:style-name="Internet_20_link" text:visited-style-name="Visited_20_Internet_20_Link"><text:span text:style-name="Internet_20_link">Merriam-Webster online</text:span></text:a><text:span text:style-name="Internet_20_link"> 2023</text:span>:</text:p>
      <text:p text:style-name="P7"><text:a xlink:type="simple" xlink:href="https://www.merriam-webster.com/dictionary/father" text:style-name="Internet_20_link" text:visited-style-name="Visited_20_Internet_20_Link"><text:span text:style-name="Internet_20_link">Father</text:span></text:a> noun</text:p>
      <text:p text:style-name="P7">1 a (1) : a male parent</text:p>
      <text:p text:style-name="P7"><text:s text:c="6"/>(2) : a man who has begotten a child</text:p>
      <text:p text:style-name="P7">capitalized</text:p>
      <text:p text:style-name="P7">(1) : GOD sense 1</text:p>
      <text:p text:style-name="P7">(2) : the first person of the Trinity (see TRINITY sense 1)</text:p>
      <text:p text:style-name="P7"/>
      <text:p text:style-name="P7"><text:a xlink:type="simple" xlink:href="https://www.merriam-webster.com/dictionary/god" text:style-name="Internet_20_link" text:visited-style-name="Visited_20_Internet_20_Link"><text:span text:style-name="Internet_20_link">GOD sense 1</text:span></text:a>:</text:p>
      <text:p text:style-name="P7">1 God : the supreme or <text:span text:style-name="T18">ultimate reality</text:span>: such as</text:p>
      <text:p text:style-name="P7"><text:s text:c="8"/>a : the <text:span text:style-name="T18">Being</text:span> perfect in power, wisdom, and goodness who is worshipped (as in <text:span text:style-name="T18">Judaism, Christianity, Islam, and Hinduism</text:span>) as creator and ruler of the universe</text:p>
      <text:p text:style-name="P7"><text:s text:c="13"/><text:span text:style-name="T18">Throughout the patristic and medieval periods</text:span>, Christian theologians taught that God created the universe …—Jame Schaefer </text:p>
      <text:p text:style-name="P7"><text:s text:c="14"/>… the <text:span text:style-name="T18">Supreme Being</text:span> or God, the personal form of the <text:span text:style-name="T18">Ultimate Reality</text:span>, is conceived by Hindus as having <text:span text:style-name="T18">various aspects</text:span>. —Sunita Pant Bansal</text:p>
      <text:p text:style-name="P7"><text:s text:c="8"/>b Christian Science : the incorporeal <text:span text:style-name="T18">divine Principle</text:span> ruling over all as eternal Spirit : <text:span text:style-name="T18">infinite Mind</text:span></text:p>
      <text:p text:style-name="P7"><text:span text:style-name="Internet_20_link"/></text:p>
      <text:p text:style-name="P7"><text:a xlink:type="simple" xlink:href="https://www.merriam-webster.com/dictionary/ultimate%20reality" text:style-name="Internet_20_link" text:visited-style-name="Visited_20_Internet_20_Link"><text:span text:style-name="Internet_20_link">Merriam-Websters 2023</text:span></text:a>: definition “ultimate reality”:</text:p>
      <text:p text:style-name="P7"><text:span text:style-name="T18">Ultimate Reality noun </text:span>often capitalized U&amp;R</text:p>
      <text:p text:style-name="P7">: something that is the supreme, final, and fundamental power in all reality</text:p>
      <text:p text:style-name="P7">ultimate reality in <text:span text:style-name="T18">Judaism, Christianity, and Islam</text:span> is God</text:p>
      <text:p text:style-name="P7"/>
      <text:p text:style-name="P7"><text:a xlink:type="simple" xlink:href="https://www.merriam-webster.com/dictionary/Supreme%20Being" text:style-name="Internet_20_link" text:visited-style-name="Visited_20_Internet_20_Link"><text:span text:style-name="Internet_20_link">Merriam-Websters 2023</text:span></text:a>: definition “supreme being”:</text:p>
      <text:p text:style-name="P43">Supreme Being noun</text:p>
      <text:p text:style-name="P7">: GOD sense 1</text:p>
      <text:p text:style-name="P7"/>
      <text:p text:style-name="P7"><text:a xlink:type="simple" xlink:href="https://www.merriam-webster.com/dictionary/ultimate%20reality" text:style-name="Internet_20_link" text:visited-style-name="Visited_20_Internet_20_Link"><text:span text:style-name="Internet_20_link">Merriam-Websters 2023</text:span></text:a>: definition “principle”:</text:p>
      <text:p text:style-name="P7">principle noun</text:p>
      <text:p text:style-name="P7">4 capitalized <text:span text:style-name="T18">Christian Science</text:span> : a divine principle : GOD</text:p>
      <text:p text:style-name="P7"/>
      <text:p text:style-name="P7"><text:a xlink:type="simple" xlink:href="https://www.merriam-webster.com/dictionary/Trinity" text:style-name="Internet_20_link" text:visited-style-name="Visited_20_Internet_20_Link"><text:span text:style-name="Internet_20_link">TRINITY sense 1</text:span></text:a></text:p>
      <text:p text:style-name="P7">1 : the unity of Father, Son, and Holy Spirit as three persons in one Godhead according to <text:span text:style-name="T18">Christian dogma</text:span></text:p>
      <text:p text:style-name="P7"/>
      <text:p text:style-name="P7"><text:a xlink:type="simple" xlink:href="https://www.merriam-webster.com/dictionary/dogma" text:style-name="Internet_20_link" text:visited-style-name="Visited_20_Internet_20_Link"><text:span text:style-name="Internet_20_link">Merriam-Websters 2023</text:span></text:a>: definition “dogma”:</text:p>
      <text:p text:style-name="P7">dogma noun</text:p>
      <text:p text:style-name="P7">1 a : something held as an established <text:span text:style-name="T18">opinion</text:span></text:p>
      <text:p text:style-name="P7"><text:s text:c="3"/>b : a code of such <text:span text:style-name="T18">tenet</text:span>s</text:p>
      <text:p text:style-name="P7"><text:s text:c="3"/>c : a <text:span text:style-name="T18">point of view</text:span> or <text:span text:style-name="T18">tenet</text:span> put forth as authoritative <text:span text:style-name="T18">without adequate grounds</text:span></text:p>
      <text:p text:style-name="P7">2 : a doctrine or body of doctrines concerning faith or morals formally stated and <text:span text:style-name="T18">authoritatively proclaimed by a church</text:span></text:p>
      <text:p text:style-name="P7"/>
      <text:p text:style-name="P7"><text:a xlink:type="simple" xlink:href="https://www.merriam-webster.com/dictionary/tenet" text:style-name="Internet_20_link" text:visited-style-name="Visited_20_Internet_20_Link"><text:span text:style-name="Internet_20_link">Merriam-Websters 2023</text:span></text:a>: definition “tenet”:</text:p>
      <text:p text:style-name="P7">tenet noun</text:p>
      <text:p text:style-name="P7">: a principle, belief, or doctrine <text:span text:style-name="T18">generally held to be true</text:span></text:p>
      <text:p text:style-name="P7">especially : one held in common by members of an <text:span text:style-name="T18">organization, movement, or profession</text:span></text:p>
      <text:p text:style-name="P24"><text:span text:style-name="T8">Noah Webster 1828</text:span><text:span text:style-name="T19">:</text:span></text:p>
      <text:p text:style-name="P44">(to save space, the etymology section, some examples, and the transitive verb definition have been omitted)</text:p>
      <text:p text:style-name="P45"/>
      <text:p text:style-name="P7">FATHER, n.</text:p>
      <text:p text:style-name="P7">1. He who begets a child;</text:p>
      <text:p text:style-name="P5">The <text:span text:style-name="T16">father</text:span><text:span text:style-name="T17"> of a fool hath no joy. Prov. xvii.</text:span></text:p>
      <text:p text:style-name="P5"><text:span text:style-name="T17">A wise son maketh a glad </text:span><text:span text:style-name="T16">father.</text:span><text:span text:style-name="T17"> Prov. x.</text:span></text:p>
      <text:p text:style-name="P20"/>
      <text:p text:style-name="P7">2. The first ancestor; the progenitor of a race or family. Adam was the <text:span text:style-name="T16">father</text:span><text:span text:style-name="T17"> of the human race. Abraham was the </text:span><text:span text:style-name="T16">father</text:span><text:span text:style-name="T17"> of the Israelites.</text:span></text:p>
      <text:p text:style-name="P21">3. The appellation of an old man, and a term of respect.</text:p>
      <text:p text:style-name="P21"/>
      <text:p text:style-name="P5"><text:span text:style-name="T17">The king of Israel said to Elisha, my </text:span><text:span text:style-name="T16">father</text:span><text:span text:style-name="T17">, shall I smite them? 2 Kings vi.</text:span></text:p>
      <text:p text:style-name="P20"/>
      <text:p text:style-name="P7"><text:span text:style-name="T17">4. The grandfather, or more remote ancestor. Nebuchadnezzar is called the </text:span><text:span text:style-name="T16">father</text:span><text:span text:style-name="T17"> of Belshazzar, though he was his grand-father. Dan. v.</text:span></text:p>
      <text:p text:style-name="P7"><text:span text:style-name="T17">5. One who feeds and supports, or exercises paternal care over another. God is called the </text:span><text:span text:style-name="T16">father</text:span><text:span text:style-name="T17"> of the fatherless. Ps. lxviii.</text:span></text:p>
      <text:p text:style-name="P7"><text:span text:style-name="T17">6. He who creates, invents, makes or composes any thing; the author, former or contriver; a founder, director or instructor. God as creator is the </text:span><text:span text:style-name="T16">father</text:span><text:span text:style-name="T17"> of all men. John viii. Jabal was the </text:span><text:span text:style-name="T16">father</text:span><text:span text:style-name="T17"> of such as dwell in tents; and Jubal of musicians. Gen. iv. God is the </text:span><text:span text:style-name="T16">father</text:span><text:span text:style-name="T17"> of spirits and lights. Homer is considered as the </text:span><text:span text:style-name="T16">father</text:span><text:span text:style-name="T17"> of epic poetry. Washington, as a defender and an affectionate and wise counselor, is called the </text:span><text:span text:style-name="T16">father</text:span><text:span text:style-name="T17"> of his country. And see I Chron. ii. 51—iv. 14.--ix.35. Satan is called the </text:span><text:span text:style-name="T16">father</text:span><text:span text:style-name="T17"> of lies; he introduced sin, and instigates men to sin. John viii. Abraham is called the </text:span><text:span text:style-name="T16">father</text:span><text:span text:style-name="T17"> of believers. He was an early believer, and a pattern of faith and obedience. Rom. iv.</text:span></text:p>
      <text:p text:style-name="P21">7. Fathers, in the plural, ancestors.</text:p>
      <text:p text:style-name="P5"><text:span text:style-name="T17">David slept with his </text:span><text:span text:style-name="T16">fathers</text:span><text:span text:style-name="T17">. 1 Kings ii.</text:span></text:p>
      <text:p text:style-name="P20"/>
      <text:p text:style-name="P7"><text:span text:style-name="T17">8. A father in law. So Heli is called the </text:span><text:span text:style-name="T16">father</text:span><text:span text:style-name="T17"> of Joseph. Luke iii.</text:span></text:p>
      <text:p text:style-name="P21">9. The appellation of the first person in the adorable Trinity.</text:p>
      <text:p text:style-name="P21"/>
      <text:p text:style-name="P5"><text:span text:style-name="T17">Go ye, therefore, and teach all nations, baptizing them in the name of the </text:span><text:span text:style-name="T16">Father</text:span><text:span text:style-name="T17">, and of the Son, and of the Holy Spirit. Matt. xxviii.</text:span></text:p>
      <text:p text:style-name="P20"/>
      <text:p text:style-name="P21">10. The title given to dignitaries of the church, superiors of convents, and to popish confessors.</text:p>
      <text:p text:style-name="P21">11. The appellation of the ecclesiastical writers of the first centuries, as Polycarp, Jerome, &amp;c.</text:p>
      <text:p text:style-name="P7"><text:span text:style-name="T17">12. The title of a senator in ancient Rome; as conscript </text:span><text:span text:style-name="T16">fathers</text:span><text:span text:style-name="T17">.</text:span></text:p>
      <text:p text:style-name="P32"/>
      <text:p text:style-name="P41">Acts 8:9</text:p>
      <text:p text:style-name="P32">But there was a certain man, called Simon, which beforetime in the same city used sorcery, and <text:span text:style-name="T14">bewitched</text:span> (G1839) the people of Samaria, giving out that himself was some great one:</text:p>
      <text:p text:style-name="P32"/>
      <text:p text:style-name="P37">Acts 8:11</text:p>
      <text:p text:style-name="P32">And to him they had regard, because that of long time he had <text:span text:style-name="T14">bewitched</text:span> (G1839) them with sorceries.</text:p>
      <text:p text:style-name="P32"/>
      <text:p text:style-name="P37">Galatians 3:1</text:p>
      <text:p text:style-name="P32">O foolish Galatians, who hath <text:span text:style-name="T14">bewitched</text:span> (G940) you, that ye should not obey the truth, before whose eyes Jesus Christ hath been evidently set forth, crucified among you?</text:p>
      <text:p text:style-name="P32"/>
      <table:table table:name="Table15" table:style-name="Table15">
        <table:table-column table:style-name="Table15.A" table:number-columns-repeated="2"/>
        <table:table-row table:style-name="Table15.1">
          <table:table-cell table:style-name="Table15.A1" office:value-type="string">
            <text:p text:style-name="P8">Bewitched: G1839 (2x)</text:p>
          </table:table-cell>
          <table:table-cell table:style-name="Table15.B1" office:value-type="string">
            <text:p text:style-name="P8">Strongs definition</text:p>
          </table:table-cell>
        </table:table-row>
        <table:table-row table:style-name="Table15.1">
          <table:table-cell table:style-name="Table15.A2" office:value-type="string">
            <text:p text:style-name="P35">ἐξίστημι</text:p>
            <text:p text:style-name="P36">(ex-is'-tay-mee)</text:p>
          </table:table-cell>
          <table:table-cell table:style-name="Table15.B2" office:value-type="string">
            <text:p text:style-name="P10">ἐξίστημι exístēmi, ex-is'-tay-mee; from G1537 and G2476; to put (stand) out of wits, i.e. astound, or (reflexively) become astounded, insane:—amaze, be (make) astonished, be beside self (selves), bewitch, wonder.</text:p>
          </table:table-cell>
        </table:table-row>
      </table:table>
      <text:p text:style-name="Standard"/>
      <table:table table:name="Table16" table:style-name="Table16">
        <table:table-column table:style-name="Table16.A" table:number-columns-repeated="2"/>
        <table:table-row table:style-name="Table16.1">
          <table:table-cell table:style-name="Table16.A1" office:value-type="string">
            <text:p text:style-name="P8">Bewitched: G940 (1x)</text:p>
          </table:table-cell>
          <table:table-cell table:style-name="Table16.B1" office:value-type="string">
            <text:p text:style-name="P8">Strongs definition</text:p>
          </table:table-cell>
        </table:table-row>
        <table:table-row table:style-name="Table16.1">
          <table:table-cell table:style-name="Table16.A2" office:value-type="string">
            <text:p text:style-name="P35">βασκαίνω</text:p>
            <text:p text:style-name="P36">(bas-kah'-ee-no)</text:p>
          </table:table-cell>
          <table:table-cell table:style-name="Table16.B2" office:value-type="string">
            <text:p text:style-name="P10">βασκαίνω baskaínō, bas-kah'-ee-no; akin to G5335; to malign, i.e. (by extension) to fascinate (by false representations):—bewitch.</text:p>
          </table:table-cell>
        </table:table-row>
      </table:table>
      <text:p text:style-name="Standard"/>
      <text:p text:style-name="P46"><text:a xlink:type="simple" xlink:href="https://www.merriam-webster.com/dictionary/bewitched" text:style-name="Internet_20_link" text:visited-style-name="Visited_20_Internet_20_Link"><text:span text:style-name="Internet_20_link">Merriam-Webster 2023</text:span></text:a>:</text:p>
      <text:p text:style-name="P47"><text:a xlink:type="simple" xlink:href="https://www.merriam-webster.com/dictionary/bewitched" text:style-name="Internet_20_link" text:visited-style-name="Visited_20_Internet_20_Link"><text:span text:style-name="Internet_20_link"><text:span text:style-name="T14">bewitched</text:span></text:span></text:a> adjective</text:p>
      <text:p text:style-name="P47">: controlled or affected by or as if by a magic spell</text:p>
      <text:p text:style-name="P47">: influenced, attracted, or charmed as if by magic</text:p>
      <text:p text:style-name="P47"/>
      <text:p text:style-name="P47"><text:a xlink:type="simple" xlink:href="https://www.merriam-webster.com/dictionary/bewitch" text:style-name="Internet_20_link" text:visited-style-name="Visited_20_Internet_20_Link"><text:span text:style-name="Internet_20_link"><text:span text:style-name="T14">bewitch</text:span></text:span></text:a> transitive verb</text:p>
      <text:p text:style-name="P47">1 a : to influence or affect especially injuriously by witchcraft</text:p>
      <text:p text:style-name="P47"><text:s text:c="3"/>b : to cast a spell over</text:p>
      <text:p text:style-name="P47">2 : to attract as if by the power of witchcraft : ENCHANT, FASCINATE</text:p>
      <text:p text:style-name="P47">intransitive verb</text:p>
      <text:p text:style-name="P47">: to bewitch someone or something</text:p>
      <text:p text:style-name="P47"/>
      <text:p text:style-name="P48">Noah Webster's 1828</text:p>
      <text:p text:style-name="P49">BEWITCHED, pp. Fascinated; charmed.</text:p>
      <text:p text:style-name="P49"/>
      <text:p text:style-name="P49">BEWITCH, v.t. To Fascinate;</text:p>
      <text:p text:style-name="P49">2. To charm. To fascinate; to please to such a degree as to take away the power of resistance.</text:p>
      <text:p text:style-name="P49">3. To deceive and mislead by juggling tricks or imposture. Acts viii. 9</text:p>
      <text:p text:style-name="P47"/>
      <text:p text:style-name="P50">Exodus 25:9</text:p>
      <text:p text:style-name="P47">According to all that I shew thee, after the pattern of the <text:span text:style-name="T14">tabernacle</text:span>, and the pattern of all the instruments thereof, even so shall ye make it.</text:p>
      <text:p text:style-name="P47"/>
      <text:p text:style-name="P47">NOTE: the English word “tabernacle” appears 297 times in the Bible. 7 Hebrew words are translated to it (H168, H4908, H5520, H5521, H5522, H7900) and 3 Greek words are translated to it (G4633, G4636, G4638). The English word “tabernacles” appears 30 times in the Bible. 3 Hebrew words are translated to it (H168, H4908, H5521). 2 Greek words are translated to it (G4633, G4634).</text:p>
      <text:p text:style-name="P47"/>
      <text:p text:style-name="P47">NOTE: Strongs definitions have been omitted.</text:p>
      <text:p text:style-name="P47"/>
      <text:p text:style-name="P46"><text:a xlink:type="simple" xlink:href="https://www.merriam-webster.com/dictionary/tabernacle" text:style-name="Internet_20_link" text:visited-style-name="Visited_20_Internet_20_Link"><text:span text:style-name="Internet_20_link"><text:span text:style-name="T20">Merriam-Webster 2023</text:span></text:span></text:a>:</text:p>
      <text:p text:style-name="P47"><text:a xlink:type="simple" xlink:href="https://www.merriam-webster.com/dictionary/tabernacle" text:style-name="Internet_20_link" text:visited-style-name="Visited_20_Internet_20_Link"><text:span text:style-name="Internet_20_link">Tabernacle</text:span></text:a> noun</text:p>
      <text:p text:style-name="P47">1 : a house of worship</text:p>
      <text:p text:style-name="P47">specifically : a large building or tent used for evangelistic services</text:p>
      <text:p text:style-name="P47">2 : a receptacle for the consecrated elements of the Eucharist</text:p>
      <text:p text:style-name="P47">especially : an ornamental locked box used for reserving the Communion hosts</text:p>
      <text:p text:style-name="P47">3 a often capitalized : a tent sanctuary used by the Israelites during the Exodus</text:p>
      <text:p text:style-name="P47"><text:s text:c="3"/>b archaic : a dwelling place</text:p>
      <text:p text:style-name="P47"><text:s text:c="3"/>c archaic : a temporary shelter : TENT</text:p>
      <text:p text:style-name="P47"/>
      <text:p text:style-name="P47"><text:a xlink:type="simple" xlink:href="https://www.merriam-webster.com/dictionary/tabernacle" text:style-name="Internet_20_link" text:visited-style-name="Visited_20_Internet_20_Link"><text:span text:style-name="Internet_20_link">Tabernacle</text:span></text:a> intransitive verb</text:p>
      <text:p text:style-name="P47">: to take up temporary residence</text:p>
      <text:p text:style-name="P47">especially : to inhabit a physical body</text:p>
      <text:p text:style-name="P47"/>
      <text:p text:style-name="P47">Synonyms (Noun)</text:p>
      <text:p text:style-name="P47">church</text:p>
      <text:p text:style-name="P47">kirk [chiefly Scottish]</text:p>
      <text:p text:style-name="P47">temple</text:p>
      <text:p text:style-name="P47"/>
      <text:p text:style-name="P47">Example Sentences (Noun)</text:p>
      <text:p text:style-name="P47">worshippers gathering at the Baptist tabernacle on a bright Sunday morning</text:p>
      <text:p text:style-name="P47"/>
      <text:p text:style-name="P47">[NOTE: there are no examples provided for the verb form of tabernacle]</text:p>
      <text:p text:style-name="P47"/>
      <text:p text:style-name="P47">Kids Definition</text:p>
      <text:p text:style-name="P47"><text:a xlink:type="simple" xlink:href="https://www.merriam-webster.com/dictionary/tabernacle" text:style-name="Internet_20_link" text:visited-style-name="Visited_20_Internet_20_Link"><text:span text:style-name="Internet_20_link">Tabernacle</text:span></text:a> noun</text:p>
      <text:p text:style-name="P47">1 a often capitalized : a tent used as a place of worship by the Israelites during their wanderings in the wilderness with Moses</text:p>
      <text:p text:style-name="P47"><text:s text:c="3"/>b archaic : a dwelling place</text:p>
      <text:p text:style-name="P47">2 : a locked box used to hold Communion breads</text:p>
      <text:p text:style-name="P47">3 : a house of worship</text:p>
      <text:p text:style-name="Standard"/>
      <text:p text:style-name="P48"/>
      <text:p text:style-name="P51"><text:span text:style-name="T20">Noah-Webster 1828</text:span><text:span text:style-name="T21">:</text:span></text:p>
      <text:p text:style-name="Standard">TABERNACLE, n.</text:p>
      <text:p text:style-name="Standard">1. A tent. Num xxiv. Matt. xvii.</text:p>
      <text:p text:style-name="Standard">2. A temporary habitation.</text:p>
      <text:p text:style-name="Standard">3. Among the Jews, a movable building… It is also applied to the temple. Ps xv.</text:p>
      <text:p text:style-name="Standard">4. A place of worship; a sacred place.</text:p>
      <text:p text:style-name="Standard">5. Our natural body. 2 Cor. v. 2 Pet. i.</text:p>
      <text:p text:style-name="Standard">6. God’s gracious presence, or the tokens of it. Rev. xxi.</text:p>
      <text:p text:style-name="Standard">7. An ornamented chest placed on Roman catholic altars as a receptacle of the <text:a xlink:type="simple" xlink:href="https://www.newadvent.org/cathen/03767a.htm" text:style-name="Internet_20_link" text:visited-style-name="Visited_20_Internet_20_Link"><text:span text:style-name="Internet_20_link">ciborium</text:span></text:a> and <text:a xlink:type="simple" xlink:href="https://www.newadvent.org/cathen/12588a.htm" text:style-name="Internet_20_link" text:visited-style-name="Visited_20_Internet_20_Link"><text:span text:style-name="Internet_20_link">pyxis</text:span></text:a>.</text:p>
      <text:p text:style-name="Standard"/>
      <text:p text:style-name="Standard">TABERNACLE, v. i.</text:p>
      <text:p text:style-name="Standard">To dwell; to reside for a time; to be housed; as we say, Christ tabernacled in the flesh.</text:p>
      <text:p text:style-name="Standard"/>
      <text:p text:style-name="P48">Comments</text:p>
      <text:p text:style-name="Standard">As with all prior words, the reader is encouraged to explore the definitions of the words used to define the primary word being researched (eg. tabernacle → communion → sacrament → consecrate → transubstanti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blbGentium" svg:font-family="blbGentium"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874in" style:writing-mode="page"/>
      <style:text-properties fo:color="#000000" loext:opacity="100%" style:font-name="Liberation Serif" fo:font-size="12pt" fo:language="en" fo:country="US"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ext-properties fo:color="#000000" loext:opacity="100%" style:font-name="Liberation Serif"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meta:print-date>2023-06-20T11:17:33</meta:print-date>
    <dc:date>2026-07-11T12:21:24.175239844</dc:date>
    <meta:editing-cycles>433</meta:editing-cycles>
    <meta:editing-duration>PT13H1M</meta:editing-duration>
    <meta:generator>LibreOffice/26.2.4.2$Linux_X86_64 LibreOffice_project/64a984c51f4702dbd3710b13428c673a2f1292e7</meta:generator>
    <meta:document-statistic meta:table-count="16" meta:image-count="0" meta:object-count="0" meta:page-count="13" meta:paragraph-count="344" meta:word-count="3708" meta:character-count="22405" meta:non-whitespace-character-count="18930"/>
    <meta:user-defined meta:name="AppVersion">15.0000</meta:user-defined>
  </office:meta>
</office:document-meta>
</file>