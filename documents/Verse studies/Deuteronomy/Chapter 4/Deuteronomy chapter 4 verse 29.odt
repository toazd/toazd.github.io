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Liberation_Sans_4.ttf" manifest:media-type="application/x-font-ttf"/>
  <manifest:file-entry manifest:full-path="Fonts/Font_Liberation_Sans_3.ttf" manifest:media-type="application/x-font-ttf"/>
  <manifest:file-entry manifest:full-path="Fonts/Font_Liberation_Sans_1.ttf" manifest:media-type="application/x-font-ttf"/>
  <manifest:file-entry manifest:full-path="Fonts/Font_Droid_Sans_Fallback_1.ttf" manifest:media-type="application/x-font-ttf"/>
  <manifest:file-entry manifest:full-path="Fonts/Font_Liberation_Sans_2.ttf" manifest:media-type="application/x-font-ttf"/>
  <manifest:file-entry manifest:full-path="Fonts/Font_Droid_Sans_Devanagari_1.ttf" manifest:media-type="application/x-font-ttf"/>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vg:font-face-src>
        <svg:font-face-uri xlink:href="Fonts/Font_Droid_Sans_Devanagari_1.ttf" xlink:type="simple" loext:font-style="normal" loext:font-weight="normal">
          <svg:font-face-format svg:string="truetype"/>
        </svg:font-face-uri>
      </svg:font-face-src>
    </style:font-face>
    <style:font-face style:name="Droid Sans Devanagari1" svg:font-family="'Droid Sans Devanagari'" style:font-family-generic="system" style:font-pitch="variable">
      <svg:font-face-src>
        <svg:font-face-uri xlink:href="Fonts/Font_Droid_Sans_Devanagari_1.ttf" xlink:type="simple" loext:font-style="normal" loext:font-weight="normal">
          <svg:font-face-format svg:string="truetype"/>
        </svg:font-face-uri>
      </svg:font-face-src>
    </style:font-face>
    <style:font-face style:name="Droid Sans Fallback" svg:font-family="'Droid Sans Fallback'" style:font-family-generic="system" style:font-pitch="variable">
      <svg:font-face-src>
        <svg:font-face-uri xlink:href="Fonts/Font_Droid_Sans_Fallback_1.ttf" xlink:type="simple" loext:font-style="normal"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Source Han Sans CN" svg:font-family="'Source Han Sans CN'"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P1" style:family="paragraph" style:parent-style-name="Standard">
      <style:text-properties style:font-name="Liberation Sans" fo:font-size="13pt" style:font-size-asian="11.3500003814697pt" style:font-size-complex="13pt"/>
    </style:style>
    <style:style style:name="P2" style:family="paragraph" style:parent-style-name="Standard">
      <style:text-properties style:font-name="Liberation Sans" fo:font-size="13pt" officeooo:rsid="001fcda1" officeooo:paragraph-rsid="001fcda1" style:font-size-asian="11.3500003814697pt" style:font-size-complex="13pt"/>
    </style:style>
    <style:style style:name="P3" style:family="paragraph" style:parent-style-name="Standard">
      <style:text-properties style:font-name="Liberation Sans" fo:font-size="13pt" officeooo:rsid="0022d7e9" officeooo:paragraph-rsid="002b9282" style:font-size-asian="11.3500003814697pt" style:font-size-complex="13pt"/>
    </style:style>
    <style:style style:name="P4" style:family="paragraph" style:parent-style-name="Standard">
      <style:text-properties style:font-name="Liberation Sans" fo:font-size="13pt" officeooo:paragraph-rsid="002a96ac" style:font-size-asian="11.3500003814697pt" style:font-size-complex="13pt"/>
    </style:style>
    <style:style style:name="P5" style:family="paragraph" style:parent-style-name="Standard">
      <style:paragraph-properties fo:text-align="center" style:justify-single-word="false"/>
      <style:text-properties style:font-name="Liberation Sans" fo:font-size="13pt" officeooo:rsid="002d0ac4" officeooo:paragraph-rsid="002d0ac4" style:font-size-asian="11.3500003814697pt" style:font-size-complex="13pt"/>
    </style:style>
    <style:style style:name="P6" style:family="paragraph" style:parent-style-name="Standard">
      <style:paragraph-properties fo:text-align="center" style:justify-single-word="false"/>
      <style:text-properties style:font-name="Liberation Sans" fo:font-size="13pt" officeooo:rsid="002eac55" officeooo:paragraph-rsid="002eac55" style:font-size-asian="11.3500003814697pt" style:font-size-complex="13pt"/>
    </style:style>
    <style:style style:name="P7" style:family="paragraph" style:parent-style-name="Standard">
      <style:text-properties style:font-name="Liberation Sans" fo:font-size="13pt" officeooo:paragraph-rsid="002a96ac" style:font-size-asian="13pt" style:font-size-complex="13pt"/>
    </style:style>
    <style:style style:name="P8" style:family="paragraph" style:parent-style-name="Standard">
      <style:text-properties fo:color="#127622" loext:opacity="100%" style:font-name="Liberation Sans" fo:font-size="13pt" fo:font-weight="bold" style:font-size-asian="11.3500003814697pt" style:font-weight-asian="bold" style:font-size-complex="13pt" style:font-weight-complex="bold"/>
    </style:style>
    <style:style style:name="P9" style:family="paragraph" style:parent-style-name="Standard">
      <style:text-properties fo:color="#127622" loext:opacity="100%" style:font-name="Liberation Sans" fo:font-size="13pt" officeooo:rsid="0025e879" officeooo:paragraph-rsid="001fcda1" style:font-size-asian="11.3500003814697pt" style:font-size-complex="13pt"/>
    </style:style>
    <style:style style:name="P10" style:family="paragraph" style:parent-style-name="Standard">
      <style:text-properties fo:color="#127622" loext:opacity="100%" style:font-name="Liberation Sans" fo:font-size="13pt" officeooo:paragraph-rsid="002a96ac" style:font-size-asian="11.3500003814697pt" style:font-size-complex="13pt"/>
    </style:style>
    <style:style style:name="P11" style:family="paragraph" style:parent-style-name="Table_20_Contents">
      <style:text-properties fo:color="#127622" loext:opacity="100%" style:font-name="Liberation Sans" fo:font-size="13pt" style:font-size-asian="11.3500003814697pt" style:font-size-complex="13pt"/>
    </style:style>
    <style:style style:name="P12" style:family="paragraph" style:parent-style-name="Standard">
      <style:text-properties officeooo:paragraph-rsid="001fcda1"/>
    </style:style>
    <style:style style:name="P13" style:family="paragraph" style:parent-style-name="Standard">
      <style:text-properties style:use-window-font-color="true" loext:opacity="0%" style:font-name="Liberation Sans" fo:font-size="13pt" officeooo:paragraph-rsid="00270403" style:font-size-asian="11.3500003814697pt" style:font-size-complex="13pt"/>
    </style:style>
    <style:style style:name="P14" style:family="paragraph" style:parent-style-name="Standard">
      <style:text-properties officeooo:paragraph-rsid="002a96ac"/>
    </style:style>
    <style:style style:name="P15" style:family="paragraph" style:parent-style-name="Standard">
      <style:text-properties officeooo:paragraph-rsid="002b9282"/>
    </style:style>
    <style:style style:name="P16" style:family="paragraph" style:parent-style-name="Standard">
      <style:paragraph-properties fo:text-align="center" style:justify-single-word="false"/>
      <style:text-properties officeooo:rsid="0035507c" officeooo:paragraph-rsid="0035507c"/>
    </style:style>
    <style:style style:name="P17" style:family="paragraph" style:parent-style-name="Standard">
      <style:text-properties fo:color="#127622" loext:opacity="100%" style:font-name="Liberation Sans" fo:font-size="13pt" officeooo:paragraph-rsid="002a96ac" style:font-size-asian="13pt" style:font-size-complex="13pt"/>
    </style:style>
    <style:style style:name="P18" style:family="paragraph" style:parent-style-name="Standard">
      <style:text-properties style:use-window-font-color="true" loext:opacity="0%" style:font-name="Liberation Sans" fo:font-size="13pt" officeooo:rsid="00281b0e" officeooo:paragraph-rsid="00281b0e" style:font-size-asian="11.3500003814697pt" style:font-size-complex="13pt"/>
    </style:style>
    <style:style style:name="P19" style:family="paragraph" style:parent-style-name="Standard">
      <style:text-properties style:font-name="Liberation Sans" fo:font-size="13pt" style:font-size-asian="11.3500003814697pt" style:font-size-complex="13pt"/>
    </style:style>
    <style:style style:name="P20" style:family="paragraph" style:parent-style-name="Standard">
      <style:text-properties style:font-name="Liberation Sans" fo:font-size="13pt" officeooo:rsid="001fcda1" officeooo:paragraph-rsid="00281b0e" style:font-size-asian="11.3500003814697pt" style:font-size-complex="13pt"/>
    </style:style>
    <style:style style:name="P21" style:family="paragraph" style:parent-style-name="Table_20_Contents">
      <style:text-properties style:font-name="Liberation Sans" fo:font-size="13pt" style:font-size-asian="11.3500003814697pt" style:font-size-complex="13pt"/>
    </style:style>
    <style:style style:name="P22" style:family="paragraph" style:parent-style-name="Table_20_Contents">
      <style:text-properties fo:color="#127622" loext:opacity="100%" style:font-name="Liberation Sans" fo:font-size="13pt" style:font-size-asian="11.3500003814697pt" style:font-size-complex="13pt"/>
    </style:style>
    <style:style style:name="T1" style:family="text">
      <style:text-properties officeooo:rsid="00243e6a"/>
    </style:style>
    <style:style style:name="T2" style:family="text">
      <style:text-properties fo:color="#127622" loext:opacity="100%"/>
    </style:style>
    <style:style style:name="T3" style:family="text">
      <style:text-properties fo:color="#127622" loext:opacity="100%" style:font-name="Liberation Sans" fo:font-size="13pt" style:font-size-asian="11.3500003814697pt" style:font-size-complex="13pt"/>
    </style:style>
    <style:style style:name="T4" style:family="text">
      <style:text-properties fo:color="#127622" loext:opacity="100%" style:font-name="Liberation Sans" fo:font-size="13pt" officeooo:rsid="0025e879" style:font-size-asian="11.3500003814697pt" style:font-size-complex="13pt"/>
    </style:style>
    <style:style style:name="T5" style:family="text">
      <style:text-properties fo:color="#127622" loext:opacity="100%" style:font-name="Liberation Sans" fo:font-size="13pt" officeooo:rsid="00243e6a" style:font-size-asian="11.3500003814697pt" style:font-size-complex="13pt"/>
    </style:style>
    <style:style style:name="T6" style:family="text">
      <style:text-properties style:font-name="Liberation Sans" fo:font-size="13pt" style:font-size-asian="11.3500003814697pt" style:font-size-complex="13pt"/>
    </style:style>
    <style:style style:name="T7" style:family="text">
      <style:text-properties style:font-name="Liberation Sans" fo:font-size="13pt" officeooo:rsid="001fcda1" style:font-size-asian="11.3500003814697pt" style:font-size-complex="13pt"/>
    </style:style>
    <style:style style:name="T8" style:family="text">
      <style:text-properties style:font-name="Liberation Sans" fo:font-size="13pt" officeooo:rsid="0022d7e9" style:font-size-asian="11.3500003814697pt" style:font-size-complex="13pt"/>
    </style:style>
    <style:style style:name="T9" style:family="text">
      <style:text-properties style:font-name="Liberation Sans" fo:font-size="13pt" officeooo:rsid="00243e6a" style:font-size-asian="11.3500003814697pt" style:font-size-complex="13pt"/>
    </style:style>
    <style:style style:name="T10" style:family="text">
      <style:text-properties style:font-name="Liberation Sans" fo:font-size="13pt" officeooo:rsid="002eac55" style:font-size-asian="11.3500003814697pt" style:font-size-complex="13pt"/>
    </style:style>
    <style:style style:name="T11" style:family="text">
      <style:text-properties style:font-name="Liberation Sans" fo:font-size="13pt" officeooo:rsid="0025e879" style:font-size-asian="11.3500003814697pt" style:font-size-complex="13pt"/>
    </style:style>
    <style:style style:name="T12" style:family="text">
      <style:text-properties style:font-name="Liberation Sans" fo:font-size="13pt" officeooo:rsid="00324109" style:font-size-asian="11.3500003814697pt" style:font-size-complex="13pt"/>
    </style:style>
    <style:style style:name="T13" style:family="text">
      <style:text-properties style:font-name="Liberation Sans" fo:font-size="13pt" fo:background-color="#ffff00" loext:char-shading-value="0" style:font-size-asian="11.3500003814697pt" style:font-size-complex="13pt"/>
    </style:style>
    <style:style style:name="T14" style:family="text">
      <style:text-properties style:font-name="Liberation Sans" fo:font-size="13pt" fo:background-color="#ffff00" loext:char-shading-value="0" style:font-size-asian="11.3500003814697pt" style:font-size-complex="13pt"/>
    </style:style>
    <style:style style:name="T15" style:family="text">
      <style:text-properties style:font-name="Liberation Sans" fo:font-size="13pt" fo:background-color="#fff5ce" loext:char-shading-value="0" style:font-size-asian="11.3500003814697pt" style:font-size-complex="13pt"/>
    </style:style>
    <style:style style:name="T16" style:family="text">
      <style:text-properties style:font-name="Liberation Sans" fo:font-size="13pt" fo:background-color="#ffe994" loext:char-shading-value="0" style:font-size-asian="11.3500003814697pt" style:font-size-complex="13pt"/>
    </style:style>
    <style:style style:name="T17" style:family="text">
      <style:text-properties style:use-window-font-color="true" loext:opacity="0%"/>
    </style:style>
    <style:style style:name="T18" style:family="text">
      <style:text-properties style:use-window-font-color="true" loext:opacity="0%" fo:font-size="12pt" style:font-size-asian="12pt" style:font-size-complex="12pt"/>
    </style:style>
    <style:style style:name="T19" style:family="text">
      <style:text-properties style:use-window-font-color="true" loext:opacity="0%" fo:font-size="12pt" officeooo:rsid="0037d869" style:font-size-asian="12pt" style:font-size-complex="12pt"/>
    </style:style>
    <style:style style:name="T20" style:family="text">
      <style:text-properties style:use-window-font-color="true" loext:opacity="0%" style:font-name="Liberation Sans" fo:font-size="13pt" style:font-size-asian="11.3500003814697pt" style:font-size-complex="13pt"/>
    </style:style>
    <style:style style:name="T21" style:family="text">
      <style:text-properties style:use-window-font-color="true" loext:opacity="0%" style:font-name="Liberation Sans" fo:font-size="13pt" officeooo:rsid="00281b0e" style:font-size-asian="11.3500003814697pt" style:font-size-complex="13pt"/>
    </style:style>
    <style:style style:name="T22" style:family="text">
      <style:text-properties style:use-window-font-color="true" loext:opacity="0%" fo:background-color="#ffff00" loext:char-shading-value="0"/>
    </style:style>
    <style:style style:name="T23" style:family="text">
      <style:text-properties fo:font-size="12pt" officeooo:rsid="0037d869" style:font-size-asian="12pt" style:font-size-complex="12pt"/>
    </style:style>
    <style:style style:name="T24" style:family="text">
      <style:text-properties officeooo:rsid="002b9282"/>
    </style:style>
    <style:style style:name="T25" style:family="text">
      <style:text-properties officeooo:rsid="00306173"/>
    </style:style>
    <style:style style:name="T26" style:family="text">
      <style:text-properties officeooo:rsid="00324109"/>
    </style:style>
    <style:style style:name="T27" style:family="text">
      <style:text-properties officeooo:rsid="0033802f"/>
    </style:style>
    <style:style style:name="T28" style:family="text">
      <style:text-properties officeooo:rsid="003982b4"/>
    </style:style>
    <style:style style:name="T29" style:family="text">
      <style:text-properties fo:background-color="#ffff00" loext:char-shading-value="0"/>
    </style:style>
    <style:style style:name="T30"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euteronomy 4:29</text:p>
      <text:p text:style-name="P1">But if from thence thou shalt seek the LORD thy God, thou shalt find him, if thou seek him with all thy heart and with all thy soul.</text:p>
      <text:p text:style-name="P1"/>
      <text:p text:style-name="P15"><text:span text:style-name="T8">Context: The </text:span><text:span text:style-name="T9">book of Deuteronomy occurs at the end of the wilderness wanderings </text:span><text:span text:style-name="T10">(</text:span><text:span text:style-name="T4">Deu. 1:3</text:span><text:span text:style-name="T10">) </text:span><text:span text:style-name="T9">of the children of Israel </text:span><text:span text:style-name="T11">in the land of Moab (</text:span><text:span text:style-name="T4">Deu. 1:5</text:span><text:span text:style-name="T11">)</text:span><text:span text:style-name="T9">. It contains recounts of past events, recounts of commandments, instructions on how to handle varied situations in the land which they will soon conquer and posses (the book of </text:span><text:span text:style-name="T5">Joshua</text:span><text:span text:style-name="T9">), and expounding on varies topics.</text:span></text:p>
      <text:p text:style-name="P3"/>
      <text:p text:style-name="P3"><text:span text:style-name="T1">Deuteronomy chapter 4 verses 1-40 include</text:span><text:span text:style-name="T27">s</text:span><text:span text:style-name="T1"> exhortations for obedience </text:span><text:span text:style-name="T24">followed by </text:span><text:span text:style-name="T27">two </text:span><text:span text:style-name="T24">promise</text:span><text:span text:style-name="T27">s</text:span><text:span text:style-name="T24"> </text:span><text:span text:style-name="T27">for what the</text:span><text:span text:style-name="T24"> children of Israel </text:span><text:span text:style-name="T27">should do in the future when they become disobedient.</text:span></text:p>
      <text:p text:style-name="P1"/>
      <text:p text:style-name="P5">The first and second commandment <text:span text:style-name="T25">given at Mt. Sinai</text:span></text:p>
      <table:table table:name="Table1" table:style-name="Table1">
        <table:table-column table:style-name="Table1.A"/>
        <table:table-row>
          <table:table-cell table:style-name="Table1.A1" office:value-type="string">
            <text:p text:style-name="P17">Exodus 20:3-6</text:p>
            <text:p text:style-name="P7"><text:span text:style-name="T17">Thou shalt have no other gods before me. [</text:span><text:span text:style-name="T2">4</text:span><text:span text:style-name="T17">] </text:span><text:span text:style-name="T22">Thou shalt not make unto thee any graven image</text:span><text:span text:style-name="T17">, or any likeness of any thing that is in heaven above, or that is in the earth beneath, or that is in the water under the earth: [</text:span><text:span text:style-name="T2">5</text:span><text:span text:style-name="T17">] Thou shalt not bow down thyself to them, nor serve them: for I the LORD thy God am a jealous God, visiting the iniquity of the fathers upon the children unto the third and fourth generation of them that hate me; [</text:span><text:span text:style-name="T2">6</text:span><text:span text:style-name="T17">] And shewing mercy unto thousands of them that love me, and keep my commandments.</text:span></text:p>
          </table:table-cell>
        </table:table-row>
      </table:table>
      <text:p text:style-name="P1"/>
      <text:p text:style-name="P6">The LORD warns Israel about their future <text:span text:style-name="T28">disobedience</text:span> and gives them <text:span text:style-name="T26">two</text:span> promise<text:span text:style-name="T26">s</text:span></text:p>
      <table:table table:name="Table2" table:style-name="Table2">
        <table:table-column table:style-name="Table2.A"/>
        <table:table-row>
          <table:table-cell table:style-name="Table2.A1" office:value-type="string">
            <text:p text:style-name="P10">Deuteronomy 4:25-29<text:span text:style-name="T18"> </text:span><text:span text:style-name="T19">(cf. </text:span><text:span text:style-name="T23">Deuteronomy 30:15-20</text:span><text:span text:style-name="T19">, </text:span><text:span text:style-name="T23">Leviticus 26:14-39</text:span><text:span text:style-name="T19">)</text:span></text:p>
            <text:p text:style-name="P14"><text:span text:style-name="T6">When thou shalt beget children, and children's children, and ye shall have remained long in the land, and </text:span><text:span text:style-name="T13">shall corrupt yourselves</text:span><text:span text:style-name="T6">, and </text:span><text:span text:style-name="T13">make a graven image</text:span><text:span text:style-name="T6">, or the likeness of any thing, and shall do evil in the sight of the LORD thy God, to provoke him to anger: [</text:span><text:span text:style-name="T4">26</text:span><text:span text:style-name="T6">] I call heaven and earth to witness against you this day, that </text:span><text:span text:style-name="T13">ye shall soon utterly perish</text:span><text:span text:style-name="T6"> from off the land whereunto ye go over Jordan to possess it; </text:span><text:span text:style-name="T13">ye shall not prolong your days</text:span><text:span text:style-name="T6"> upon it, but </text:span><text:span text:style-name="T13">shall utterly be destroyed</text:span><text:span text:style-name="T6">. [</text:span><text:span text:style-name="T4">27</text:span><text:span text:style-name="T6">] And </text:span><text:span text:style-name="T13">the LORD shall scatter you among the nations</text:span><text:span text:style-name="T6">, and ye shall be left few in number among the heathen, whither the LORD shall lead you. [</text:span><text:span text:style-name="T4">28</text:span><text:span text:style-name="T6">] And there </text:span><text:span text:style-name="T13">ye shall serve gods</text:span><text:span text:style-name="T6">, the work of men's hands, wood and stone, which neither see, nor hear, nor eat, nor smell. [</text:span><text:span text:style-name="T4">29</text:span><text:span text:style-name="T6">] </text:span><text:span text:style-name="T15">But if from thence thou shalt seek the LORD thy God, thou shalt find him, if thou seek him with all thy heart and with all thy soul</text:span><text:span text:style-name="T6">. </text:span><text:span text:style-name="T12">[</text:span><text:span text:style-name="T3">30</text:span><text:span text:style-name="T12">] </text:span><text:span text:style-name="T6">When thou art </text:span><text:span text:style-name="T13">in tribulation</text:span><text:span text:style-name="T6">, and </text:span><text:span text:style-name="T13">all these things are come upon thee</text:span><text:span text:style-name="T6">, even in the latter days, </text:span><text:span text:style-name="T16">if thou turn to the LORD thy God, and shalt be obedient unto his voice;</text:span><text:span text:style-name="T6"> [</text:span><text:span text:style-name="T3">31</text:span><text:span text:style-name="T6">] </text:span><text:span text:style-name="T16">(For the LORD thy God is a merciful God;) he will not forsake thee, neither destroy thee, nor forget the covenant of thy fathers which he sware unto them.</text:span></text:p>
          </table:table-cell>
        </table:table-row>
      </table:table>
      <text:p text:style-name="P18"/>
      <text:p text:style-name="P16"><text:span text:style-name="T21">T</text:span><text:span text:style-name="T20">he LORD explains the purpose of all the miracles that brought them to where they are</text:span></text:p>
      <table:table table:name="Table3" table:style-name="Table3">
        <table:table-column table:style-name="Table3.A"/>
        <table:table-row>
          <table:table-cell table:style-name="Table3.A1" office:value-type="string">
            <text:p text:style-name="P11">Deuteronomy 4:32-35</text:p>
            <text:p text:style-name="Table_20_Contents"><text:span text:style-name="T6">For ask now of the days that are past, which were before thee, since the day that God created man upon the earth, and ask from the one side of heaven unto the other, whether there hath been any such thing as this great thing is, or hath been heard like it? [</text:span><text:span text:style-name="T3">33</text:span><text:span text:style-name="T6">] Did ever people hear the voice of God speaking out of the midst of the fire, as thou hast heard, and live? [</text:span><text:span text:style-name="T3">34</text:span><text:span text:style-name="T6">] Or hath God assayed to go and take him a nation from the midst of another nation, by temptations, by signs, and by wonders, and by war, and by a mighty hand, and by a stretched out arm, and by great terrors, according to all that the LORD your God did for you in Egypt before your eyes? [</text:span><text:span text:style-name="T3">35</text:span><text:span text:style-name="T6">] </text:span><text:span text:style-name="T13">Unto thee it was shewed, that thou mightest know that the LORD he is God; there is none else beside him.</text:span></text:p>
          </table:table-cell>
        </table:table-row>
      </table:table>
      <table:table table:name="Table4" table:style-name="Table4">
        <table:table-column table:style-name="Table4.A"/>
        <text:soft-page-break/>
        <table:table-row>
          <table:table-cell table:style-name="Table4.A1" office:value-type="string">
            <text:p text:style-name="P11">1 Chronicles 28:9</text:p>
            <text:p text:style-name="P21">And thou, Solomon my son, know thou the God of thy father, and <text:span text:style-name="T30">serve him with a perfect heart</text:span> and with <text:span text:style-name="T30">a willing mind</text:span>: for the LORD searcheth all hearts, and understandeth all the imaginations of the thoughts: <text:span text:style-name="T30">if thou seek him, he will be found of thee</text:span>; but if thou forsake him, he will cast thee off for ever.</text:p>
          </table:table-cell>
        </table:table-row>
      </table:table>
      <text:p text:style-name="P20"/>
      <table:table table:name="Table5" table:style-name="Table5">
        <table:table-column table:style-name="Table5.A"/>
        <table:table-row>
          <table:table-cell table:style-name="Table5.A1" office:value-type="string">
            <text:p text:style-name="P11">2 Chronicles 15:1-2</text:p>
            <text:p text:style-name="Table_20_Contents"><text:span text:style-name="T6">And the Spirit of God came upon Azariah the son of Oded: [</text:span><text:span text:style-name="T3">2</text:span><text:span text:style-name="T6">] And he went out to meet Asa, and said unto him, Hear ye me, Asa, and all Judah and Benjamin; The LORD is with you, while ye be with him; and </text:span><text:span text:style-name="T14">if ye seek him, he will be found of you</text:span><text:span text:style-name="T6">; but if ye forsake him, he will forsake you.</text:span></text:p>
          </table:table-cell>
        </table:table-row>
      </table:table>
      <text:p text:style-name="P20"/>
      <table:table table:name="Table6" table:style-name="Table6">
        <table:table-column table:style-name="Table6.A"/>
        <table:table-row>
          <table:table-cell table:style-name="Table6.A1" office:value-type="string">
            <text:p text:style-name="P11">Ezra 8:21-23</text:p>
            <text:p text:style-name="Table_20_Contents"><text:span text:style-name="T6">Then I proclaimed a fast there, at the river of Ahava, that we might afflict ourselves before our God, </text:span><text:span text:style-name="T14">to seek of him a right way for us, and for our little ones, and for all our substance.</text:span><text:span text:style-name="T6"> [</text:span><text:span text:style-name="T3">22</text:span><text:span text:style-name="T6">] For I was ashamed to require of the king a band of soldiers and horsemen to help us against the enemy in the way: because we had spoken unto the king, saying, The </text:span><text:span text:style-name="T14">hand of our God is upon all them for good that seek him;</text:span><text:span text:style-name="T6"> but his power and his wrath is against all them that forsake him. [</text:span><text:span text:style-name="T3">23</text:span><text:span text:style-name="T6">] So we fasted and besought our God for this: and he was intreated of us.</text:span></text:p>
          </table:table-cell>
        </table:table-row>
      </table:table>
      <text:p text:style-name="P20"/>
      <table:table table:name="Table7" table:style-name="Table7">
        <table:table-column table:style-name="Table7.A"/>
        <table:table-row>
          <table:table-cell table:style-name="Table7.A1" office:value-type="string">
            <text:p text:style-name="P11">Psalm 22:23-26</text:p>
            <text:p text:style-name="Table_20_Contents"><text:span text:style-name="T6">Ye that fear the LORD, praise him; all ye the seed of Jacob, glorify him; and fear him, all ye the seed of Israel. [</text:span><text:span text:style-name="T3">24</text:span><text:span text:style-name="T6">] For he hath not despised nor abhorred the affliction of the afflicted; neither hath he hid his face from him; but </text:span><text:span text:style-name="T14">when he cried unto him, he heard.</text:span><text:span text:style-name="T6"> [</text:span><text:span text:style-name="T3">25</text:span><text:span text:style-name="T6">] My praise shall be of thee in the great congregation: I will pay my vows before them that fear him. [</text:span><text:span text:style-name="T3">26</text:span><text:span text:style-name="T6">] The meek shall eat and be satisfied: </text:span><text:span text:style-name="T14">they shall praise the LORD that seek him</text:span><text:span text:style-name="T6">: your heart shall live for ever.</text:span></text:p>
          </table:table-cell>
        </table:table-row>
      </table:table>
      <text:p text:style-name="P20"/>
      <table:table table:name="Table8" table:style-name="Table8">
        <table:table-column table:style-name="Table8.A"/>
        <table:table-row>
          <table:table-cell table:style-name="Table8.A1" office:value-type="string">
            <text:p text:style-name="P11">Psalm 119:2</text:p>
            <text:p text:style-name="P21"><text:span text:style-name="T30">Blessed are they</text:span> that keep his testimonies, and <text:span text:style-name="T30">that seek him with the whole heart</text:span>.</text:p>
          </table:table-cell>
        </table:table-row>
      </table:table>
      <text:p text:style-name="P20"/>
      <table:table table:name="Table9" table:style-name="Table9">
        <table:table-column table:style-name="Table9.A"/>
        <table:table-row>
          <table:table-cell table:style-name="Table9.A1" office:value-type="string">
            <text:p text:style-name="P11">1 John 1:9</text:p>
            <text:p text:style-name="P21">If we confess our sins, he is faithful and just to forgive us our sins, and to cleanse us from all unrighteousness.</text:p>
          </table:table-cell>
        </table:table-row>
      </table:table>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0:31:28.009743540</meta:creation-date>
    <meta:editing-cycles>32</meta:editing-cycles>
    <meta:editing-duration>PT2H17M17S</meta:editing-duration>
    <dc:date>2023-11-23T11:06:35.013297492</dc:date>
    <meta:generator>LibreOffice/7.5.8.2$Linux_X86_64 LibreOffice_project/50$Build-2</meta:generator>
    <meta:document-statistic meta:table-count="9" meta:image-count="0" meta:object-count="0" meta:page-count="2" meta:paragraph-count="25" meta:word-count="1048" meta:character-count="5453" meta:non-whitespace-character-count="4430"/>
  </office:meta>
</office:document-meta>
</file>