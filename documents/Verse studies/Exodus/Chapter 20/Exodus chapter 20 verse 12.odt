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2.8292in" style:rel-column-width="23469*"/>
    </style:style>
    <style:style style:name="Table1.B" style:family="table-column">
      <style:table-column-properties style:column-width="2.5361in" style:rel-column-width="21038*"/>
    </style:style>
    <style:style style:name="Table1.C" style:family="table-column">
      <style:table-column-properties style:column-width="2.5347in" style:rel-column-width="2102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3" style:family="table">
      <style:table-properties style:width="7.9in" table:align="margins"/>
    </style:style>
    <style:style style:name="Table3.A" style:family="table-column">
      <style:table-column-properties style:column-width="3.95in" style:rel-column-width="32767*"/>
    </style:style>
    <style:style style:name="Table3.B" style:family="table-column">
      <style:table-column-properties style:column-width="3.95in" style:rel-column-width="32768*"/>
    </style:style>
    <style:style style:name="Table3.A1" style:family="table-cell">
      <style:table-cell-properties style:vertical-align="middle"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2.633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0.5pt solid #000000"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P1" style:family="paragraph" style:parent-style-name="Standard">
      <style:text-properties fo:color="#006400" loext:opacity="100%"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text-properties fo:color="#006400" loext:opacity="100%" fo:font-size="13pt" style:font-size-asian="13pt" style:font-size-complex="13pt"/>
    </style:style>
    <style:style style:name="P4" style:family="paragraph" style:parent-style-name="Standard">
      <style:text-properties fo:color="#006400" loext:opacity="100%" fo:font-size="13pt" officeooo:paragraph-rsid="007c210f" style:font-size-asian="13pt" style:font-size-complex="13pt"/>
    </style:style>
    <style:style style:name="P5" style:family="paragraph" style:parent-style-name="Standard">
      <style:text-properties fo:font-size="13pt" officeooo:paragraph-rsid="007c210f" style:font-size-asian="13pt" style:font-size-complex="13pt"/>
    </style:style>
    <style:style style:name="P6" style:family="paragraph" style:parent-style-name="Standard">
      <style:text-properties fo:font-size="13pt" officeooo:paragraph-rsid="007de79d" style:font-size-asian="13pt" style:font-size-complex="13pt"/>
    </style:style>
    <style:style style:name="P7" style:family="paragraph" style:parent-style-name="Standard">
      <style:text-properties fo:font-size="13pt" officeooo:paragraph-rsid="007e5b5b" style:font-size-asian="13pt" style:font-size-complex="13pt"/>
    </style:style>
    <style:style style:name="P8" style:family="paragraph" style:parent-style-name="Standard">
      <style:text-properties fo:color="#006400" loext:opacity="100%" fo:font-size="13pt" officeooo:paragraph-rsid="0064273b" style:font-size-asian="13pt" style:font-size-complex="13pt"/>
    </style:style>
    <style:style style:name="P9" style:family="paragraph" style:parent-style-name="Standard">
      <style:text-properties fo:font-size="13pt" officeooo:paragraph-rsid="0064273b" style:font-size-asian="13pt" style:font-size-complex="13pt"/>
    </style:style>
    <style:style style:name="P10" style:family="paragraph" style:parent-style-name="Standard">
      <style:text-properties fo:color="#006400" loext:opacity="100%" fo:font-size="13pt" officeooo:paragraph-rsid="007de79d" style:font-size-asian="13pt" style:font-size-complex="13pt"/>
    </style:style>
    <style:style style:name="P11" style:family="paragraph" style:parent-style-name="Standard">
      <style:paragraph-properties fo:text-align="center" style:justify-single-word="false"/>
      <style:text-properties fo:font-size="13pt" officeooo:paragraph-rsid="005e9f44" style:font-size-asian="13pt" style:font-size-complex="13pt"/>
    </style:style>
    <style:style style:name="P12" style:family="paragraph" style:parent-style-name="Standard">
      <style:text-properties fo:color="#006400" loext:opacity="100%" fo:font-size="13pt" officeooo:paragraph-rsid="005e9f44" style:font-size-asian="13pt" style:font-size-complex="13pt"/>
    </style:style>
    <style:style style:name="P13" style:family="paragraph" style:parent-style-name="Standard">
      <style:text-properties fo:font-size="13pt" officeooo:paragraph-rsid="005e9f44" style:font-size-asian="13pt" style:font-size-complex="13pt"/>
    </style:style>
    <style:style style:name="P14" style:family="paragraph" style:parent-style-name="Standard">
      <style:text-properties fo:color="#006400" loext:opacity="100%" fo:font-size="13pt" officeooo:paragraph-rsid="008081ce" style:font-size-asian="13pt" style:font-size-complex="13pt"/>
    </style:style>
    <style:style style:name="P15" style:family="paragraph" style:parent-style-name="Standard">
      <style:text-properties officeooo:paragraph-rsid="008081ce"/>
    </style:style>
    <style:style style:name="P16" style:family="paragraph" style:parent-style-name="Standard">
      <style:text-properties fo:font-size="13pt" officeooo:paragraph-rsid="008081ce" style:font-size-asian="13pt" style:font-size-complex="13pt"/>
    </style:style>
    <style:style style:name="P17" style:family="paragraph" style:parent-style-name="Standard">
      <style:text-properties fo:font-size="13pt" officeooo:rsid="008081ce" officeooo:paragraph-rsid="008081ce" style:font-size-asian="13pt" style:font-size-complex="13pt"/>
    </style:style>
    <style:style style:name="P18" style:family="paragraph" style:parent-style-name="Text_20_body">
      <style:paragraph-properties fo:margin-left="0in" fo:margin-right="0in" fo:margin-top="0in" fo:margin-bottom="0in" style:contextual-spacing="false" fo:text-indent="0in" style:auto-text-indent="false"/>
      <style:text-properties fo:font-size="13pt" officeooo:paragraph-rsid="006bb1cc" style:font-size-asian="13pt" style:font-size-complex="13pt"/>
    </style:style>
    <style:style style:name="P19" style:family="paragraph" style:parent-style-name="Table_20_Contents">
      <style:paragraph-properties fo:text-align="center" style:justify-single-word="false"/>
      <style:text-properties fo:font-size="13pt" officeooo:rsid="007935b4" officeooo:paragraph-rsid="007935b4" style:font-size-asian="13pt" style:font-size-complex="13pt"/>
    </style:style>
    <style:style style:name="P20" style:family="paragraph" style:parent-style-name="Table_20_Contents">
      <style:text-properties fo:font-size="13pt" officeooo:rsid="007935b4" officeooo:paragraph-rsid="007935b4" style:font-size-asian="13pt" style:font-size-complex="13pt"/>
    </style:style>
    <style:style style:name="P21" style:family="paragraph" style:parent-style-name="Standard">
      <style:text-properties fo:color="#006400" loext:opacity="100%" fo:font-size="13pt" officeooo:rsid="006bf392" style:font-size-asian="13pt" style:font-size-complex="13pt"/>
    </style:style>
    <style:style style:name="P22" style:family="paragraph" style:parent-style-name="Standard">
      <style:text-properties fo:font-size="13pt" officeooo:paragraph-rsid="006a7433" style:font-size-asian="13pt" style:font-size-complex="13pt"/>
    </style:style>
    <style:style style:name="P23" style:family="paragraph" style:parent-style-name="Standard">
      <style:text-properties fo:color="#000000" loext:opacity="100%" fo:font-size="13pt" officeooo:rsid="006bf392" style:font-size-asian="13pt" style:font-size-complex="13pt"/>
    </style:style>
    <style:style style:name="P24" style:family="paragraph" style:parent-style-name="Standard">
      <style:text-properties fo:font-size="13pt" officeooo:paragraph-rsid="007038d9" style:font-size-asian="13pt" style:font-size-complex="13pt"/>
    </style:style>
    <style:style style:name="P25" style:family="paragraph" style:parent-style-name="Standard">
      <style:paragraph-properties fo:text-align="center" style:justify-single-word="false"/>
      <style:text-properties fo:font-size="13pt" officeooo:paragraph-rsid="00695dbe" style:font-size-asian="13pt" style:font-size-complex="13pt"/>
    </style:style>
    <style:style style:name="P26" style:family="paragraph" style:parent-style-name="Standard">
      <style:text-properties fo:font-size="13pt" officeooo:paragraph-rsid="00695dbe" style:font-size-asian="13pt" style:font-size-complex="13pt"/>
    </style:style>
    <style:style style:name="T1" style:family="text">
      <style:text-properties style:text-position="super 58%" officeooo:rsid="003397dc"/>
    </style:style>
    <style:style style:name="T2" style:family="text">
      <style:text-properties style:text-position="super 58%" officeooo:rsid="0034f8a8"/>
    </style:style>
    <style:style style:name="T3" style:family="text">
      <style:text-properties officeooo:rsid="0046ab1d"/>
    </style:style>
    <style:style style:name="T4" style:family="text">
      <style:text-properties officeooo:rsid="0049648e"/>
    </style:style>
    <style:style style:name="T5" style:family="text">
      <style:text-properties officeooo:rsid="00463b49"/>
    </style:style>
    <style:style style:name="T6" style:family="text">
      <style:text-properties fo:background-color="transparent" loext:char-shading-value="0"/>
    </style:style>
    <style:style style:name="T7" style:family="text">
      <style:text-properties fo:background-color="#ffff00" loext:char-shading-value="0"/>
    </style:style>
    <style:style style:name="T8" style:family="text">
      <style:text-properties style:text-position="super 58%" officeooo:rsid="004f7275"/>
    </style:style>
    <style:style style:name="T9" style:family="text">
      <style:text-properties style:text-position="super 58%" officeooo:rsid="004ee888"/>
    </style:style>
    <style:style style:name="T10" style:family="text">
      <style:text-properties officeooo:rsid="0005eca1"/>
    </style:style>
    <style:style style:name="T11" style:family="text">
      <style:text-properties style:text-position="super 58%" officeooo:rsid="0041355e"/>
    </style:style>
    <style:style style:name="T12" style:family="text">
      <style:text-properties officeooo:rsid="0005eca1" fo:background-color="#ffff00" loext:char-shading-value="0"/>
    </style:style>
    <style:style style:name="T13" style:family="text">
      <style:text-properties fo:color="#006400" loext:opacity="100%" officeooo:rsid="006b8b59"/>
    </style:style>
    <style:style style:name="T14" style:family="text">
      <style:text-properties fo:color="#006400" loext:opacity="100%"/>
    </style:style>
    <style:style style:name="T15" style:family="text">
      <style:text-properties style:text-position="super 58%" officeooo:rsid="003f3d39"/>
    </style:style>
    <style:style style:name="T16" style:family="text">
      <style:text-properties officeooo:rsid="002f000c"/>
    </style:style>
    <style:style style:name="T17" style:family="text">
      <style:text-properties officeooo:rsid="00335ccb"/>
    </style:style>
    <style:style style:name="T18" style:family="text">
      <style:text-properties officeooo:rsid="00303cad"/>
    </style:style>
    <style:style style:name="T19" style:family="text">
      <style:text-properties fo:color="#000000" loext:opacity="100%" fo:font-size="13pt" style:font-size-asian="13pt" style:font-size-complex="13pt"/>
    </style:style>
    <style:style style:name="T20" style:family="text">
      <style:text-properties fo:color="#000000" loext:opacity="100%" fo:font-size="13pt" fo:background-color="#ffbf00" loext:char-shading-value="0" style:font-size-asian="13pt" style:font-size-complex="13pt"/>
    </style:style>
    <style:style style:name="T21" style:family="text">
      <style:text-properties fo:color="#000000" loext:opacity="100%"/>
    </style:style>
    <style:style style:name="T22" style:family="text">
      <style:text-properties fo:color="#000000" loext:opacity="100%" fo:background-color="#ffbf00" loext:char-shading-value="0"/>
    </style:style>
    <style:style style:name="T23" style:family="text">
      <style:text-properties fo:color="#000000" loext:opacity="100%" fo:background-color="#ffff00" loext:char-shading-value="0"/>
    </style:style>
    <style:style style:name="T24" style:family="text">
      <style:text-properties fo:color="#ff0000" loext:opacity="100%"/>
    </style:style>
    <style:style style:name="T25" style:family="text">
      <style:text-properties fo:color="#006400" loext:opacity="100%" officeooo:rsid="006bb1cc"/>
    </style:style>
    <style:style style:name="T26" style:family="text">
      <style:text-properties officeooo:rsid="007a9183"/>
    </style:style>
    <style:style style:name="T27" style:family="text">
      <style:text-properties fo:color="#006400" loext:opacity="100%" officeooo:rsid="006bf392"/>
    </style:style>
    <style:style style:name="T28" style:family="text">
      <style:text-properties fo:color="#006400" loext:opacity="100%" officeooo:rsid="006cad01"/>
    </style:style>
    <style:style style:name="T29" style:family="text">
      <style:text-properties officeooo:rsid="0049e9cf"/>
    </style:style>
    <style:style style:name="T30" style:family="text">
      <style:text-properties officeooo:rsid="004bb98c"/>
    </style:style>
    <style:style style:name="T31" style:family="text">
      <style:text-properties officeooo:rsid="003894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odus 20:12</text:p>
      <text:p text:style-name="P2">Honour<text:span text:style-name="T1">H35</text:span><text:span text:style-name="T2">13</text:span> thy father and thy mother: that thy days may be long upon the land which the LORD thy God giveth thee.</text:p>
      <text:p text:style-name="P2"/>
      <text:p text:style-name="P2">“<text:span text:style-name="T3">Honour thy father and thy mother” is </text:span><text:span text:style-name="T4">number five</text:span> of the <text:span text:style-name="T4">ten</text:span> commandments <text:span text:style-name="T3">given from God to Moses on Mount Sinai </text:span><text:span text:style-name="T5">(Exodus 20:3-17, Exodus 34:28, Deuteronomy 4:13, Deuteronomy 10:4).</text:span></text:p>
      <text:p text:style-name="P2"/>
      <text:p text:style-name="P3">Deuteronomy 5:16</text:p>
      <text:p text:style-name="P2">Honour<text:span text:style-name="T1">H35</text:span><text:span text:style-name="T2">13</text:span> thy father and thy mother, as the LORD thy God hath commanded thee;<text:span text:style-name="T6"> that </text:span><text:span text:style-name="T7">thy days may be prolonged</text:span><text:span text:style-name="T6">,</text:span> and <text:span text:style-name="T7">that it may go well with thee</text:span>, in the land which the LORD thy God giveth thee.</text:p>
      <text:p text:style-name="P2"/>
      <text:p text:style-name="P4">Ephesians 6:1-3</text:p>
      <text:p text:style-name="P5">Children<text:span text:style-name="T8">G5043</text:span>, obey<text:span text:style-name="T9">G5219</text:span> your parents <text:span text:style-name="T7">in the Lord</text:span>: for this is right. <text:span text:style-name="T10">Honour</text:span><text:span text:style-name="T11">G5091</text:span><text:span text:style-name="T10"> thy father and mother; (which is the first commandment with promise;) That it may </text:span><text:span text:style-name="T12">be well with thee</text:span><text:span text:style-name="T10">, and thou mayest </text:span><text:span text:style-name="T12">live long on the earth</text:span><text:span text:style-name="T10">.</text:span></text:p>
      <text:p text:style-name="P5"/>
      <text:p text:style-name="P6"><text:span text:style-name="T13">C</text:span><text:span text:style-name="T14">ol</text:span><text:span text:style-name="T13">ossians</text:span><text:span text:style-name="T14"> 3:20</text:span></text:p>
      <text:p text:style-name="P7">Children, obey<text:span text:style-name="T9">G5219</text:span> your<text:span text:style-name="T6"> parents in all thin</text:span>gs: for this is well pleasing unto the Lord.</text:p>
      <text:p text:style-name="P6"/>
      <text:p text:style-name="P3">Leviticus 19:3</text:p>
      <text:p text:style-name="P2">Ye shall fear<text:span text:style-name="T1">H3372</text:span> every man his mother, and his father, and keep my sabbaths: I am the LORD your God.</text:p>
      <text:p text:style-name="P2"/>
      <text:p text:style-name="P3">Exodus 21:15</text:p>
      <text:p text:style-name="P2">And he that smiteth<text:span text:style-name="T1">H</text:span><text:span text:style-name="T15">5221</text:span> his father, or his mother, shall be surely put to death.</text:p>
      <text:p text:style-name="P2"/>
      <text:p text:style-name="P3">Exodus 21:17</text:p>
      <text:p text:style-name="P2">And he that curseth<text:span text:style-name="T1">H</text:span><text:span text:style-name="T15">7043</text:span> his father, or his mother, shall surely be put to death.</text:p>
      <text:p text:style-name="P2"/>
      <text:p text:style-name="P3">Leviticus 20:9</text:p>
      <text:p text:style-name="P2">For every one that curseth<text:span text:style-name="T1">H</text:span><text:span text:style-name="T15">7043</text:span> his father or his mother shall be surely put to death: he hath cursed<text:span text:style-name="T1">H</text:span><text:span text:style-name="T15">7043</text:span> his father or his mother; his blood shall be upon him.</text:p>
      <text:p text:style-name="P2"/>
      <text:p text:style-name="P8">Deuteronomy 21:18-21</text:p>
      <text:p text:style-name="P9">If a man have a stubborn and rebellious son, which will not obey the voice of his father, or the voice of his mother, and that, when they have chastened him, will not hearken unto them: Then shall his father and his mother lay hold on him, and bring him out unto the elders of his city, and unto the gate of his place; And they shall say unto the elders of his city, This our son is stubborn and rebellious, he will not obey our voice; he is a glutton, and a drunkard. And all the men of his city shall stone him with stones, that he die: so shalt thou put evil away from among you; and all Israel shall hear, and fear.</text:p>
      <text:p text:style-name="P9"/>
      <text:p text:style-name="P10">Proverbs 13:1</text:p>
      <text:p text:style-name="P6">A <text:span text:style-name="T7">wise</text:span> son heareth his father’s instruction: but a scorner heareth not rebuke.</text:p>
      <text:p text:style-name="P6"/>
      <text:p text:style-name="P10">Proverbs 22:15</text:p>
      <text:p text:style-name="P6">Foolishness is bound in the heart of a child; but the rod of correction shall drive it far from him.</text:p>
      <text:p text:style-name="P6"/>
      <text:p text:style-name="P10">Proverbs 19:18</text:p>
      <text:p text:style-name="P6">Chasten thy son while there is hope, and let not thy soul spare for his crying.</text:p>
      <text:p text:style-name="P6"/>
      <text:p text:style-name="P10">Proverbs 29:15</text:p>
      <text:p text:style-name="P6">The rod and reproof give <text:span text:style-name="T7">wisdom</text:span>: but a child left to himself bringeth his mother to shame.</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11">Verse</text:p>
          </table:table-cell>
          <table:table-cell table:style-name="Table1.B1" office:value-type="string">
            <text:p text:style-name="P11">Usage</text:p>
          </table:table-cell>
          <table:table-cell table:style-name="Table1.C1" office:value-type="string">
            <text:p text:style-name="P11">Translated elsewhere as</text:p>
          </table:table-cell>
        </table:table-row>
        <table:table-row>
          <table:table-cell table:style-name="Table1.A2" office:value-type="string">
            <text:p text:style-name="P12">Deuteronomy 27:16</text:p>
            <text:p text:style-name="P13">Cursed be <text:span text:style-name="T7">he that setteth light</text:span><text:span text:style-name="T6"> by </text:span>his father or his mother. And all the people shall say, Amen.</text:p>
          </table:table-cell>
          <table:table-cell table:style-name="Table1.B2" office:value-type="string">
            <text:p text:style-name="P13">Hold in contempt, To disgrace, dishonour, be lightly esteemed, be dishonoured, be despised</text:p>
          </table:table-cell>
          <table:table-cell table:style-name="Table1.C2" office:value-type="string">
            <text:p text:style-name="P11">H7034</text:p>
            <text:p text:style-name="P11">seem vile, shall be condemned, lightly esteemed, despised, base, settest light</text:p>
          </table:table-cell>
        </table:table-row>
        <table:table-row>
          <table:table-cell table:style-name="Table1.A3" office:value-type="string">
            <text:p text:style-name="P12">Ezekiel 22:7</text:p>
            <text:p text:style-name="P13">In thee <text:span text:style-name="T7">have they set light</text:span><text:span text:style-name="T6"> by</text:span> father and mother: in the midst of thee have they dealt by oppression with the stranger: in thee have they vexed the fatherless and the widow.</text:p>
          </table:table-cell>
          <table:table-cell table:style-name="Table1.B2" office:value-type="string">
            <text:p text:style-name="P13">Hold in contempt, To disgrace, dishonour, be lightly esteemed, be dishonoured, be despised</text:p>
          </table:table-cell>
          <table:table-cell table:style-name="Table1.C2" office:value-type="string">
            <text:p text:style-name="P11">H7034</text:p>
          </table:table-cell>
        </table:table-row>
        <table:table-row>
          <table:table-cell table:style-name="Table1.A4" office:value-type="string">
            <text:p text:style-name="P12">I Samuel 18:30</text:p>
            <text:p text:style-name="P13">Then the princes of the Philistines went forth: and it came to pass, after they went forth, that David behaved himself more wisely than all the servants of Saul; so that his name was much <text:span text:style-name="T7">set by</text:span>.</text:p>
          </table:table-cell>
          <table:table-cell table:style-name="Table1.B2" office:value-type="string">
            <text:p text:style-name="P13">Valuable, to make rare</text:p>
            <text:p text:style-name="P13">to esteem, be prized, be valuable, be precious, be costly, be appraised</text:p>
          </table:table-cell>
          <table:table-cell table:style-name="Table1.C2" office:value-type="string">
            <text:p text:style-name="P11">H3365</text:p>
            <text:p text:style-name="P11">precious, prized</text:p>
          </table:table-cell>
        </table:table-row>
        <table:table-row>
          <table:table-cell table:style-name="Table1.A5" office:value-type="string">
            <text:p text:style-name="P12">I Samuel 26:24</text:p>
            <text:p text:style-name="P13">And, behold, as thy life <text:span text:style-name="T7">was much set by</text:span> this day in mine eyes, so let my life <text:span text:style-name="T7">be much set by</text:span> in the eyes of the LORD, and let him deliver me out of all tribulation.</text:p>
          </table:table-cell>
          <table:table-cell table:style-name="Table1.B2" office:value-type="string">
            <text:p text:style-name="P13"><text:span text:style-name="T16">To twist </text:span><text:span text:style-name="T17">(as to twine cord together) </text:span><text:span text:style-name="T18">for example to be large </text:span>(in various senses, as in body, mind, estate or honor, also in pride)</text:p>
            <text:p text:style-name="P13">to grow, become great or important, promote, make powerful, praise, magnify, do great things</text:p>
            <text:p text:style-name="P13"/>
          </table:table-cell>
          <table:table-cell table:style-name="Table1.C2" office:value-type="string">
            <text:p text:style-name="P11">H1431</text:p>
            <text:p text:style-name="P11">magnify, great, grow, nourish up, grow up, greater</text:p>
          </table:table-cell>
        </table:table-row>
      </table:table>
      <text:p text:style-name="P13"/>
      <text:p text:style-name="P13"/>
      <text:p text:style-name="P13"/>
      <text:p text:style-name="P14">Psalm 35:26</text:p>
      <text:p text:style-name="P15"><text:span text:style-name="T19">Let them be </text:span><text:span text:style-name="T20">ashamed</text:span><text:span text:style-name="T19"> and brought to confusion together that rejoice at mine hurt: let them be clothed with </text:span><text:span text:style-name="T20">shame</text:span><text:span text:style-name="T19"> and </text:span><text:span text:style-name="T20">dishonour</text:span><text:span text:style-name="T19"> that magnify themselves against me.</text:span></text:p>
      <text:p text:style-name="P16"><text:span text:style-name="T21"/></text:p>
      <text:p text:style-name="P14">Psalm 69:19</text:p>
      <text:p text:style-name="P15"><text:span text:style-name="T19">Thou hast known my </text:span><text:span text:style-name="T20">reproach</text:span><text:span text:style-name="T19">, and my </text:span><text:span text:style-name="T20">shame</text:span><text:span text:style-name="T19">, and my </text:span><text:span text:style-name="T20">dishonour</text:span><text:span text:style-name="T19">: mine adversaries are all before thee.</text:span></text:p>
      <text:p text:style-name="P16"><text:span text:style-name="T21"/></text:p>
      <text:p text:style-name="P14">Psalm 71:13</text:p>
      <text:p text:style-name="P15"><text:span text:style-name="T19">Let them be confounded and consumed that are adversaries to my soul; let them be covered with </text:span><text:span text:style-name="T20">reproach</text:span><text:span text:style-name="T19"> and </text:span><text:span text:style-name="T20">dishonour</text:span><text:span text:style-name="T19"> that seek my hurt.</text:span></text:p>
      <text:p text:style-name="P16"><text:span text:style-name="T21"/></text:p>
      <text:p text:style-name="P14">I Corinthians 15:42,43</text:p>
      <text:p text:style-name="P16"><text:span text:style-name="T21">So also is the resurrection of the dead. It is sown in </text:span><text:span text:style-name="T22">corruption</text:span><text:span text:style-name="T21">; it is raised in </text:span><text:span text:style-name="T23">incorruption</text:span><text:span text:style-name="T21">: It is sown in </text:span><text:span text:style-name="T22">dishonour</text:span><text:span text:style-name="T21">; it is raised in </text:span><text:span text:style-name="T23">glory</text:span><text:span text:style-name="T21">: it is sown in </text:span><text:span text:style-name="T22">weakness</text:span><text:span text:style-name="T21">; it is raised in </text:span><text:span text:style-name="T23">power</text:span><text:span text:style-name="T21">:</text:span></text:p>
      <text:p text:style-name="P17"><text:span text:style-name="T21"/></text:p>
      <text:p text:style-name="P2"><text:span text:style-name="T14"/></text:p>
      <text:p text:style-name="P2"><text:span text:style-name="T14"/></text:p>
      <text:p text:style-name="P2"><text:soft-page-break/><text:span text:style-name="T14">Luke 2:41-52</text:span></text:p>
      <text:p text:style-name="P2">Now his parents went to Jerusalem every year at the feast of the passover. And when he was twelve years old, they went up to Jerusalem after the custom of the feast. And when they had fulfilled the days, as they returned, the child Jesus tarried behind in Jerusalem; and Joseph and his mother knew not of it. But they, supposing him to have been in the company, went a day’s journey; and they sought him among their kinsfolk and acquaintance. And when they found him not, they turned back again to Jerusalem, seeking him. And it came to pass, that after three days they found him in the temple, sitting in the midst of the doctors, both hearing them, and asking them questions. And all that heard him were astonished at his understanding and answers. And when they saw him, they were amazed: and his mother said unto him, Son, why hast thou thus dealt with us? behold, thy father and I have sought thee sorrowing. And he said unto them, <text:span text:style-name="T24">How is it that ye sought me? wist ye not that I must be about my Father’s business?</text:span> And they understood not the saying which he spake unto them. And he went down with them, and came to Nazareth, and was subject unto them: but his mother kept all these sayings in her heart. And Jesus increased in wisdom and stature, and in favour with God and man.</text:p>
      <text:p text:style-name="P2"/>
      <text:p text:style-name="P18"><text:span text:style-name="T25">I </text:span><text:span text:style-name="T14">Tim</text:span><text:span text:style-name="T25">othy</text:span><text:span text:style-name="T14"> 5:4</text:span></text:p>
      <text:p text:style-name="P18">But if any widow have children or nephews, let them learn first to <text:span text:style-name="T7">shew piety</text:span> at home, and to <text:span text:style-name="T7">requite</text:span><text:span text:style-name="T6"> </text:span>their<text:span text:style-name="T6"> parents:</text:span> for that is good and acceptable before God.</text:p>
      <table:table table:name="Table3" table:style-name="Table3">
        <table:table-column table:style-name="Table3.A"/>
        <table:table-column table:style-name="Table3.B"/>
        <table:table-row>
          <table:table-cell table:style-name="Table3.A1" office:value-type="string">
            <text:p text:style-name="P19"><text:span text:style-name="T26">P</text:span>iety</text:p>
          </table:table-cell>
          <table:table-cell table:style-name="Table3.B1" office:value-type="string">
            <text:p text:style-name="P20">2. Reverence of parents or friends, accompanied with affection and devotion to their honor and happiness.</text:p>
          </table:table-cell>
        </table:table-row>
        <table:table-row>
          <table:table-cell table:style-name="Table3.A2" office:value-type="string">
            <text:p text:style-name="P19">Requite</text:p>
          </table:table-cell>
          <table:table-cell table:style-name="Table3.B2" office:value-type="string">
            <text:p text:style-name="P20">2. To do or give in return.</text:p>
          </table:table-cell>
        </table:table-row>
      </table:table>
      <text:p text:style-name="P18"/>
      <text:p text:style-name="P2"/>
      <text:p text:style-name="P21">Romans 1:28-32</text:p>
      <text:p text:style-name="P2">And even as they did not like to retain God in their knowledge, God gave them over to a reprobate mind, to do those things which are not convenient; Being filled with all <text:span text:style-name="T7">unrighteousness</text:span>, fornication, wickedness, covetousness, maliciousness; full of envy, murder, debate, deceit, malignity; whisperers, Backbiters, haters of God, despiteful, proud, boasters, inventors of evil things, <text:span text:style-name="T7">disobedient to parents</text:span>, Without understanding, covenantbreakers, without natural affection, implacable, unmerciful: Who knowing the judgment of God, that they which commit such things are worthy of death, not only do the same, but have pleasure in them that do them.</text:p>
      <text:p text:style-name="P22"/>
      <text:p text:style-name="P2"><text:span text:style-name="T27">II Timothy 3:1-</text:span><text:span text:style-name="T28">5</text:span></text:p>
      <text:p text:style-name="P23">This know also, that in the last days <text:span text:style-name="T6">perilous</text:span> times shall come. For men shall be lovers of their own selves, covetous, boasters, proud, blasphemers, <text:span text:style-name="T7">disobedient to parents</text:span>, unthankful, unholy, Without natural affection, trucebreakers, false accusers, incontinent, fierce, despisers of those that are good, Traitors, heady, highminded, lovers of pleasures more than lovers of God; Having a form of godliness, but denying the power thereof: <text:span text:style-name="T7">from such turn away</text:span>.</text:p>
      <text:p text:style-name="P2"/>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able:table table:name="Table2" table:style-name="Table2">
        <table:table-column table:style-name="Table2.A" table:number-columns-repeated="3"/>
        <text:soft-page-break/>
        <table:table-row>
          <table:table-cell table:style-name="Table2.A1" office:value-type="string">
            <text:p text:style-name="P25">Strongs <text:span text:style-name="T29">Hebrew/</text:span><text:span text:style-name="T30">Greek</text:span><text:span text:style-name="T29"> </text:span># (<text:span text:style-name="T29">E</text:span>nglish)</text:p>
          </table:table-cell>
          <table:table-cell table:style-name="Table2.A1" office:value-type="string">
            <text:p text:style-name="P25">Strongs definition</text:p>
          </table:table-cell>
          <table:table-cell table:style-name="Table2.C1" office:value-type="string">
            <text:p text:style-name="P25">Translated elsewhere as</text:p>
          </table:table-cell>
        </table:table-row>
        <table:table-row>
          <table:table-cell table:style-name="Table2.A2" office:value-type="string">
            <text:p text:style-name="P25">H3513 <text:span text:style-name="T31">(Honour)</text:span></text:p>
          </table:table-cell>
          <table:table-cell table:style-name="Table2.B2" office:value-type="string">
            <text:p text:style-name="P26">כָּבַד kâbad, kaw-bad'; or כָּבֵד kâbêd; a primitive root; to be heavy, i.e. in a bad sense (burdensome, severe, dull) or in a good sense (numerous, rich, honorable); causatively, to make weighty (in the same two senses)</text:p>
          </table:table-cell>
          <table:table-cell table:style-name="Table2.C2" office:value-type="string">
            <text:p text:style-name="P26">Glorify, honourable, heavy, harden, glorious, sore, made heavy, chargeable, great, many, heavier, promote</text:p>
          </table:table-cell>
        </table:table-row>
        <table:table-row>
          <table:table-cell table:style-name="Table2.A2" office:value-type="string">
            <text:p text:style-name="P25">H3372 <text:span text:style-name="T31">(fear)</text:span></text:p>
          </table:table-cell>
          <table:table-cell table:style-name="Table2.B3" office:value-type="string">
            <text:p text:style-name="P26">יָרֵא yârêʼ, yaw-ray'; a primitive root; to fear; morally to revere; causatively to frighten</text:p>
          </table:table-cell>
          <table:table-cell table:style-name="Table2.C2" office:value-type="string">
            <text:p text:style-name="P26">Fear, afraid, terrible, terrible thing, dreadful, reverence, fearful, terrible acts</text:p>
          </table:table-cell>
        </table:table-row>
        <table:table-row>
          <table:table-cell table:style-name="Table2.A2" office:value-type="string">
            <text:p text:style-name="P25">H5221 (smiteth)</text:p>
          </table:table-cell>
          <table:table-cell table:style-name="Table2.B4" office:value-type="string">
            <text:p text:style-name="P26">נָכָה nâkâh, naw-kaw'; a primitive root; to strike (lightly or severely, literally or figuratively)</text:p>
          </table:table-cell>
          <table:table-cell table:style-name="Table2.C2" office:value-type="string">
            <text:p text:style-name="P26">Smite, slay, kill, beat, slaughter, stricken, given, wounded, strike, stripes</text:p>
          </table:table-cell>
        </table:table-row>
        <table:table-row>
          <table:table-cell table:style-name="Table2.A2" office:value-type="string">
            <text:p text:style-name="P25">H7043 (curseth)</text:p>
          </table:table-cell>
          <table:table-cell table:style-name="Table2.B5" office:value-type="string">
            <text:p text:style-name="P26">קָלַל qâlal, kaw-lal'; a primitive root; to be (causatively, make) light, literally (swift, small, sharp, etc.) or figuratively (easy, trifling, vile, etc.)</text:p>
          </table:table-cell>
          <table:table-cell table:style-name="Table2.C2" office:value-type="string">
            <text:p text:style-name="P26">Curse, swifter, light thing, vile, lighter, despise, abated, ease, light, lighten, slightly</text:p>
          </table:table-cell>
        </table:table-row>
        <table:table-row>
          <table:table-cell table:style-name="Table2.A2" office:value-type="string">
            <text:p text:style-name="P25">G5043 (Children)</text:p>
          </table:table-cell>
          <table:table-cell table:style-name="Table2.B6" office:value-type="string">
            <text:p text:style-name="P26">τέκνον téknon, tek'-non; from the base of G5098; a child (as produced)</text:p>
          </table:table-cell>
          <table:table-cell table:style-name="Table2.C2" office:value-type="string">
            <text:p text:style-name="P26">Child, son, daughter</text:p>
          </table:table-cell>
        </table:table-row>
        <table:table-row>
          <table:table-cell table:style-name="Table2.A2" office:value-type="string">
            <text:p text:style-name="P25">G5219 (Obey)</text:p>
          </table:table-cell>
          <table:table-cell table:style-name="Table2.B6" office:value-type="string">
            <text:p text:style-name="P26">ὑπακούω hupakŏuō, hoop-ak-oo'-o; from G5259 and G191; to hear under (as a subordinate), i.e. to listen attentively; by implication, to heed or conform to a command or authority</text:p>
          </table:table-cell>
          <table:table-cell table:style-name="Table2.C2" office:value-type="string">
            <text:p text:style-name="P26">Be obedient to, hearken</text:p>
          </table:table-cell>
        </table:table-row>
        <table:table-row>
          <table:table-cell table:style-name="Table2.A2" office:value-type="string">
            <text:p text:style-name="P25">G5091 (Honour)</text:p>
          </table:table-cell>
          <table:table-cell table:style-name="Table2.B8" office:value-type="string">
            <text:p text:style-name="P26">τιμάω timáō, tim-ah'-o; from G5093; to prize, i.e. fix a valuation upon; by implication, to revere</text:p>
          </table:table-cell>
          <table:table-cell table:style-name="Table2.C2" office:value-type="string">
            <text:p text:style-name="P26">Value</text:p>
            <text:p text:style-name="P26"/>
          </table:table-cell>
        </table:table-row>
      </table:table>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06T11:27:23.526940325</meta:creation-date>
    <meta:editing-cycles>135</meta:editing-cycles>
    <meta:editing-duration>PT11H7M57S</meta:editing-duration>
    <dc:date>2026-07-11T12:21:16.417382617</dc:date>
    <meta:generator>LibreOffice/26.2.4.2$Linux_X86_64 LibreOffice_project/64a984c51f4702dbd3710b13428c673a2f1292e7</meta:generator>
    <meta:document-statistic meta:table-count="3" meta:image-count="0" meta:object-count="0" meta:page-count="4" meta:paragraph-count="95" meta:word-count="1491" meta:character-count="8621" meta:non-whitespace-character-count="7225"/>
  </office:meta>
</office:document-meta>
</file>