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7.9in" style:rel-width="100%" fo:margin-left="0in" fo:margin-top="0in" fo:margin-bottom="0in" table:align="left" style:writing-mode="page"/>
    </style:style>
    <style:style style:name="Table1.A" style:family="table-column">
      <style:table-column-properties style:column-width="3.95in" style:rel-column-width="3276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list-style-name="WWNum2"/>
    <style:style style:name="P2" style:family="paragraph" style:parent-style-name="Standard">
      <style:paragraph-properties fo:text-align="center" style:justify-single-word="false"/>
    </style:style>
    <style:style style:name="P3" style:family="paragraph" style:parent-style-name="Standard">
      <style:text-properties fo:color="#006400" loext:opacity="100%"/>
    </style:style>
    <style:style style:name="P4" style:family="paragraph" style:parent-style-name="Standard">
      <style:text-properties fo:language="en" fo:country="US" style:language-asian="zh" style:country-asian="CN" style:language-complex="hi" style:country-complex="IN"/>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color="#006400" loext:opacity="10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2" style:family="text">
      <style:text-properties fo:color="#006400" loext:opacity="100%"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3" style:family="text">
      <style:text-properties fo:color="#000000" loext:opacity="100%" fo:font-size="12pt" fo:language="en" fo:country="US" style:letter-kerning="true" fo:background-color="#dee6ef" loext:char-shading-value="0" style:font-name-asian="Noto Serif CJK SC" style:font-size-asian="12pt" style:language-asian="zh" style:country-asian="CN" style:font-name-complex="Noto Sans Devanagari" style:font-size-complex="12pt" style:language-complex="hi" style:country-complex="IN"/>
    </style:style>
    <style:style style:name="T4" style:family="text">
      <style:text-properties fo:background-color="#ff7b59" loext:char-shading-value="0"/>
    </style:style>
    <style:style style:name="T5" style:family="text">
      <style:text-properties fo:background-color="#ffff00" loext:char-shading-value="0"/>
    </style:style>
    <style:style style:name="T6" style:family="text">
      <style:text-properties fo:background-color="#dee6ef" loext:char-shading-value="0"/>
    </style:style>
    <style:style style:name="T7" style:family="text">
      <style:text-properties fo:color="#000000" loext:opacity="100%" fo:font-size="12pt" fo:language="en" fo:country="US" style:letter-kerning="true" fo:background-color="#ff7b59" loext:char-shading-value="0" style:font-name-asian="Noto Serif CJK SC" style:font-size-asian="12pt" style:language-asian="zh" style:country-asian="CN" style:font-name-complex="Noto Sans Devanagari" style:font-size-complex="12pt" style:language-complex="hi" style:country-complex="IN"/>
    </style:style>
    <style:style style:name="T8" style:family="text">
      <style:text-properties fo:background-color="#e8a202" loext:char-shading-value="0"/>
    </style:style>
    <style:style style:name="T9" style:family="text">
      <style:text-properties fo:background-color="#f7d1d5" loext:char-shading-value="0"/>
    </style:style>
    <style:style style:name="T10" style:family="text">
      <style:text-properties fo:color="#006400" loext:opacity="100%"/>
    </style:style>
    <style:style style:name="T11" style:family="text">
      <style:text-properties style:text-underline-style="none"/>
    </style:style>
    <style:style style:name="T12" style:family="text">
      <style:text-properties fo:background-color="#ffd8ce" loext:char-shading-value="0"/>
    </style:style>
    <style:style style:name="T13" style:family="text">
      <style:text-properties fo:color="#000000" loext:opacity="100%" fo:font-size="12pt" fo:language="en" fo:country="US" style:letter-kerning="true" fo:background-color="#e8a202" loext:char-shading-value="0" style:font-name-asian="Noto Serif CJK SC" style:font-size-asian="12pt" style:language-asian="zh" style:country-asian="CN" style:font-name-complex="Noto Sans Devanagari" style:font-size-complex="12pt" style:language-complex="hi" style:country-complex="IN"/>
    </style:style>
    <style:style style:name="T14" style:family="text">
      <style:text-properties fo:language="en" fo:country="US" style:language-asian="zh" style:country-asian="CN" style:language-complex="hi" style:country-complex="IN"/>
    </style:style>
    <style:style style:name="T15" style:family="text">
      <style:text-properties fo:color="#c9211e" loext:opacity="100%"/>
    </style:style>
    <style:style style:name="T16" style:family="text">
      <style:text-properties fo:color="#c9211e" loext:opacity="100%" fo:background-color="#ffff00" loext:char-shading-value="0"/>
    </style:style>
    <style:style style:name="T17" style:family="text">
      <style:text-properties fo:language="en" fo:country="US" fo:background-color="#ffff00" loext:char-shading-value="0" style:language-asian="zh" style:country-asian="CN" style:language-complex="hi" style:country-complex="IN"/>
    </style:style>
    <style:style style:name="T18" style:family="text">
      <style:text-properties fo:background-color="transparent" loext:char-shading-value="0"/>
    </style:style>
    <style:style style:name="T19" style:family="text">
      <style:text-properties fo:color="#000000" loext:opacity="100%" fo:font-size="12pt" fo:language="en" fo:country="US" style:letter-kerning="true" fo:background-color="#f7d1d5" loext:char-shading-value="0" style:font-name-asian="Noto Serif CJK SC" style:font-size-asian="12pt" style:language-asian="zh" style:country-asian="CN" style:font-name-complex="Noto Sans Devanagari" style:font-size-complex="12pt" style:language-complex="hi" style:country-complex="IN"/>
    </style:style>
    <style:style style:name="T20" style:family="text">
      <style:text-properties fo:color="#006400" loext:opacity="100%" fo:background-color="transparent" loext:char-shading-value="0"/>
    </style:style>
    <style:style style:name="T21" style:family="text">
      <style:text-properties fo:background-color="#ffbf00" loext:char-shading-value="0"/>
    </style:style>
    <style:style style:name="T22" style:family="text">
      <style:text-properties fo:color="#000000" loext:opacity="100%" fo:font-size="12pt" fo:language="en" fo:country="US" style:letter-kerning="true" fo:background-color="#ffbf00" loext:char-shading-value="0" style:font-name-asian="Noto Serif CJK SC" style:font-size-asian="12pt" style:language-asian="zh" style:country-asian="CN" style:font-name-complex="Noto Sans Devanagari" style:font-size-complex="12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2">Romans 13:12</text:span><text:span text:style-name="T1"/></text:p>
      <text:p text:style-name="Standard">The night is far spent, the day is at hand: let us therefore cast off the works of darkness, and let us put on the armour of light.</text:p>
      <text:p text:style-name="Standard"/>
      <text:p text:style-name="Standard">Read Romans chapter 13</text:p>
      <text:p text:style-name="Standard"/>
      <text:p text:style-name="Standard" loext:marker-style-name="T1"><text:span text:style-name="T2">Romans 13:11-14</text:span><text:span text:style-name="T1"/></text:p>
      <text:p text:style-name="Standard"><text:span text:style-name="T2">11</text:span> And that, knowing the time, that now it is high time to <text:span text:style-name="T3">awake</text:span> out of <text:span text:style-name="T4">sleep</text:span>: for now is <text:span text:style-name="T5">our salvation</text:span> nearer than when we believed.</text:p>
      <text:p text:style-name="Standard"><text:span text:style-name="T2">12</text:span> The night is far spent, <text:span text:style-name="T6">the day is at hand</text:span>: let us therefore cast off the <text:span text:style-name="T7">works of darkness</text:span>, and let us <text:span text:style-name="T8">put on</text:span> the armour of <text:span text:style-name="T5">light</text:span>.</text:p>
      <text:p text:style-name="Standard"><text:span text:style-name="T2">13</text:span> Let us walk <text:span text:style-name="T5">honestly</text:span>, as in the <text:span text:style-name="T5">day</text:span>; not in rioting and drunkenness, not in chambering and wantonness, not in strife and envying.</text:p>
      <text:p text:style-name="Standard"><text:span text:style-name="T2">14</text:span> But put ye on the <text:span text:style-name="T5">Lord Jesus Christ</text:span>, and make not provision for the <text:span text:style-name="T9">flesh</text:span>, to fulfil the <text:span text:style-name="T9">lusts</text:span> thereof.</text:p>
      <text:p text:style-name="Standard"/>
      <text:p text:style-name="Standard">Summary: these verses are about a Christian’s <text:span text:style-name="T3">daily</text:span> battles against the <text:span text:style-name="T7">works of darkness</text:span> (Satan) and the <text:span text:style-name="T9">lusts of the flesh</text:span> and how we are given victory over them:</text:p>
      <text:list text:style-name="WWNum2">
        <text:list-item>
          <text:p text:style-name="P1">“Cast off”/Forsake (quit, leave, abandon, depart from, renounce, reject) the works of darkness.</text:p>
          <text:list>
            <text:list-item>
              <text:p text:style-name="P1"><text:span text:style-name="T10">Ephesians 5:11</text:span> A<text:span text:style-name="T11">nd have no fellowship with the unfruitful works of darkness, but rather reprove them. </text:span></text:p>
            </text:list-item>
          </text:list>
        </text:list-item>
        <text:list-item>
          <text:p text:style-name="P1">Put on the armour of light (Ephesians 6:11-18)</text:p>
        </text:list-item>
        <text:list-item>
          <text:p text:style-name="P1">Walk honestly (live with upright conduct/without fraud or disguise/according to truth)</text:p>
          <text:list>
            <text:list-item>
              <text:p text:style-name="P1"><text:span text:style-name="T10">John 17:17</text:span> "Sanctify them through thy truth: thy word is truth." </text:p>
            </text:list-item>
          </text:list>
        </text:list-item>
        <text:list-item>
          <text:p text:style-name="P1">Put on the Lord Jesus Christ (to put someone on yourself is to become them – imitate Him)</text:p>
        </text:list-item>
        <text:list-item>
          <text:p text:style-name="P1">Make not provision for the flesh (do not provide or prepare things to fulfil the lusts of the flesh)</text:p>
        </text:list-item>
      </text:list>
      <text:p text:style-name="Standard"/>
      <text:p text:style-name="Standard">Serving the Lord requires a conscience daily effort. From the very beginning God gave humans the power to choose. Through Jesus Christ, victory over the works of darkness and the lusts of the flesh is freely available. But first, we must choose. In so choosing, we decide whom we will serve.</text:p>
      <text:p text:style-name="Standard"/>
      <text:p text:style-name="P2">References and definitions:</text:p>
      <text:p text:style-name="P2"/>
      <text:p text:style-name="Standard"><text:span text:style-name="T4">Sleeping</text:span> and <text:span text:style-name="T12">waking</text:span> are things that we do daily, typically in the <text:span text:style-name="T6">morning</text:span>. After we wake up, we typically <text:span text:style-name="T13">put on</text:span> our raiment (clothing).</text:p>
      <text:p text:style-name="Standard"/>
      <text:p text:style-name="Standard"><text:span text:style-name="T7">Sleep</text:span> can also mean <text:span text:style-name="T7">death</text:span><text:span text:style-name="T14"> (John 11:11-14).</text:span></text:p>
      <text:p text:style-name="Standard"><text:span text:style-name="T14">T</text:span>he wages (the reward or fruit) of <text:span text:style-name="T7">sin</text:span> is <text:span text:style-name="T7">death</text:span> (<text:span text:style-name="T10">Romans 6:23</text:span> For the wages of <text:span text:style-name="T7">sin</text:span> is <text:span text:style-name="T7">death</text:span>; but the gift of <text:span text:style-name="T5">God</text:span> is eternal <text:span text:style-name="T5">life</text:span> through <text:span text:style-name="T5">Jesus Christ our Lord</text:span>.). Likewise, the wages of the <text:span text:style-name="T7">works of darkness</text:span> are unfruitful (<text:span text:style-name="T2">Ephesians 5:11</text:span>: And have no fellowship with the unfruitful works of darkness, but rather reprove them.)</text:p>
      <text:p text:style-name="Standard"/>
      <text:p text:style-name="Standard">The <text:span text:style-name="T4">power of darkness</text:span> is also the <text:span text:style-name="T7">power of Satan</text:span>.</text:p>
      <text:p text:style-name="Standard"><text:span text:style-name="T10">Acts 26:18</text:span> "<text:span text:style-name="T15">To open their eyes, and to turn them from </text:span><text:span text:style-name="T7">darkness</text:span><text:span text:style-name="T15"> to </text:span><text:span text:style-name="T16">light</text:span><text:span text:style-name="T15">, and from the </text:span><text:span text:style-name="T7">power of Satan</text:span><text:span text:style-name="T15"> unto </text:span><text:span text:style-name="T16">God</text:span><text:span text:style-name="T15">, that they may receive forgiveness of sins, and inheritance among them which are sanctified by faith that is in me.</text:span>"</text:p>
      <text:p text:style-name="Standard">Colossians 1:12,13</text:p>
      <text:p text:style-name="Standard"><text:span text:style-name="T2">12</text:span> Giving thanks unto the <text:span text:style-name="T5">Father</text:span>, which hath made us meet to be partakers of the inheritance of the saints in <text:span text:style-name="T5">light</text:span>:</text:p>
      <text:p text:style-name="Standard"><text:span text:style-name="T2">13</text:span> Who hath delivered us from the <text:span text:style-name="T7">power of darkness</text:span>, and hath translated us into the kingdom of his dear <text:span text:style-name="T5">Son</text:span>:</text:p>
      <text:p text:style-name="Standard"/>
      <text:p text:style-name="P3">Romans 8:15-17</text:p>
      <text:p text:style-name="Standard"><text:span text:style-name="T10">15 </text:span>For ye have not received the spirit of bondage again to fear; but ye have received the Spirit of adoption, whereby we cry, Abba, Father. </text:p>
      <text:p text:style-name="Standard"><text:span text:style-name="T10">16</text:span> The Spirit itself beareth witness with our spirit, that we are the children of God: </text:p>
      <text:p text:style-name="Standard"><text:span text:style-name="T2">17</text:span><text:span text:style-name="T14"> And if children, then heirs; heirs of God, and </text:span><text:span text:style-name="T17">joint-heirs with Christ</text:span><text:span text:style-name="T14">; if so be that we suffer with him, that we may be also glorified together.</text:span></text:p>
      <text:p text:style-name="P4" loext:marker-style-name="T14"/>
      <text:p text:style-name="Standard" loext:marker-style-name="T1"><text:soft-page-break/><text:span text:style-name="T2">Romans 6:17,18</text:span><text:span text:style-name="T1"/></text:p>
      <text:p text:style-name="Standard"><text:span text:style-name="T2">17</text:span> But God be thanked, that ye were the <text:span text:style-name="T7">servants of sin</text:span>, but ye have obeyed from the heart that form of doctrine which was delivered you.</text:p>
      <text:p text:style-name="Standard"><text:span text:style-name="T2">18</text:span> Being then made free from sin, ye became the <text:span text:style-name="T5">servants of righteousness</text:span>.</text:p>
      <text:p text:style-name="Standard"/>
      <table:table table:name="Table1" table:style-name="Table1">
        <table:table-column table:style-name="Table1.A" table:number-columns-repeated="2"/>
        <table:table-row table:style-name="Table1.1">
          <table:table-cell table:style-name="Table1.A1" office:value-type="string">
            <text:p text:style-name="Standard">Rioting (reveling; indulging in excessive feasting)</text:p>
          </table:table-cell>
          <table:table-cell table:style-name="Table1.B1" office:value-type="string">
            <text:p text:style-name="Standard">Drunkenness (inebriated)</text:p>
          </table:table-cell>
        </table:table-row>
        <table:table-row table:style-name="Table1.1">
          <table:table-cell table:style-name="Table1.A2" office:value-type="string">
            <text:p text:style-name="Standard">Chambering (Wanton, lewd, immodest behavior)</text:p>
          </table:table-cell>
          <table:table-cell table:style-name="Table1.B2" office:value-type="string">
            <text:p text:style-name="Standard">Wantonness (licentiousness; negligence of restraint)</text:p>
          </table:table-cell>
        </table:table-row>
        <table:table-row table:style-name="Table1.1">
          <table:table-cell table:style-name="Table1.A2" office:value-type="string">
            <text:p text:style-name="Standard">Strife (exertion or contention for superiority)</text:p>
          </table:table-cell>
          <table:table-cell table:style-name="Table1.B2" office:value-type="string">
            <text:p text:style-name="Standard">Envying (ill will at others, on account of some supposed superiority)</text:p>
          </table:table-cell>
        </table:table-row>
      </table:table>
      <text:p text:style-name="Standard"/>
      <text:p text:style-name="Standard" loext:marker-style-name="T1"><text:span text:style-name="T2">Genesis 3:1-6</text:span><text:span text:style-name="T1"/></text:p>
      <text:p text:style-name="Standard"><text:span text:style-name="T2">1</text:span> Now the serpent was more subtil than any beast of the field which the LORD God had made. And he said unto the woman, Yea, hath God said, Ye shall not eat of every tree of the garden?</text:p>
      <text:p text:style-name="Standard"><text:span text:style-name="T2">2</text:span> <text:span text:style-name="T18">And the woman said unto the serpent, We may eat of the fruit of the trees of the garden:</text:span></text:p>
      <text:p text:style-name="Standard"><text:span text:style-name="T2">3</text:span> But of the fruit of the tree which is in the midst of the garden, God hath said, <text:span text:style-name="T5">Ye shall not eat of it, neither shall ye touch it, lest ye die</text:span>.</text:p>
      <text:p text:style-name="Standard"><text:span text:style-name="T2">4</text:span> And the serpent said unto the woman, <text:span text:style-name="T7">Ye shall not surely die</text:span>:</text:p>
      <text:p text:style-name="Standard"><text:span text:style-name="T2">5</text:span> For God doth know that in the day ye eat thereof, then your eyes shall be opened, and ye shall be as gods, knowing good and evil.</text:p>
      <text:p text:style-name="Standard"><text:span text:style-name="T2">6</text:span> And when the woman saw that the tree was <text:span text:style-name="T19">good for food</text:span>, and that it was <text:span text:style-name="T19">pleasant to the eyes</text:span>, and a tree <text:span text:style-name="T19">to be desired to make one wise</text:span>, she took of the fruit thereof, and did eat, and gave also unto her husband with her; and he did eat.</text:p>
      <text:p text:style-name="Standard"/>
      <text:p text:style-name="P5"><text:span text:style-name="T10">I John 2:16</text:span> For all that is in the world, the lust of the flesh, and the lust of the eyes, and the pride of life, is not of the Father, but is of the world.</text:p>
      <text:p text:style-name="P5"/>
      <text:p text:style-name="Standard"><text:span text:style-name="T2">Deuteronomy 30:15</text:span> See, I have set before thee this day <text:span text:style-name="T5">life</text:span> and <text:span text:style-name="T5">good</text:span>, and <text:span text:style-name="T7">death</text:span> and <text:span text:style-name="T7">evil</text:span>;</text:p>
      <text:p text:style-name="Standard"/>
      <text:p text:style-name="Standard"><text:span text:style-name="T10">Joshua 24:15</text:span> And if it seem evil unto you to <text:span text:style-name="T5">serve the Lord</text:span>, choose you this day whom ye will serve; whether the gods which your fathers served that were on the other side of the flood, or the gods of the Amorites, in whose land ye dwell: but as for me and my house, we will serve the Lord.</text:p>
      <text:p text:style-name="Standard"/>
      <text:p text:style-name="P5"><text:span text:style-name="T10">Proverbs 16:3</text:span> Commit thy works unto the Lord, and thy thoughts shall be established.</text:p>
      <text:p text:style-name="Standard"/>
      <text:p text:style-name="Standard" loext:marker-style-name="T1"><text:span text:style-name="T2">Proverbs 3:1-6</text:span><text:span text:style-name="T1"/></text:p>
      <text:p text:style-name="Standard"><text:span text:style-name="T2">1</text:span><text:span text:style-name="T14"> My</text:span> son, forget not my law; but let thine heart keep my commandments:</text:p>
      <text:p text:style-name="Standard"><text:span text:style-name="T2">2</text:span> For length of days, and long life, and peace, shall they add to thee.</text:p>
      <text:p text:style-name="Standard"><text:span text:style-name="T2">3</text:span> Let not mercy and truth forsake thee: bind them about thy neck; write them upon the table of thine heart:</text:p>
      <text:p text:style-name="Standard"><text:span text:style-name="T2">4</text:span> So shalt thou find favour and good understanding in the sight of God and man.</text:p>
      <text:p text:style-name="Standard"><text:span text:style-name="T2">5</text:span> Trust in the LORD with all thine heart; and lean not unto thine own understanding.</text:p>
      <text:p text:style-name="Standard"><text:span text:style-name="T2">6</text:span> In all thy ways acknowledge him, and he shall direct thy paths.</text:p>
      <text:p text:style-name="P3" loext:marker-style-name="T10"/>
      <text:p text:style-name="P3">Matthew 4:8-10</text:p>
      <text:p text:style-name="Standard"><text:span text:style-name="T10">8 </text:span>Again, the <text:span text:style-name="T7">devil</text:span><text:span text:style-name="T18"> taketh him up into an exceeding high mountain, and sheweth him all the kingdoms of the world, and the glory of them; </text:span></text:p>
      <text:p text:style-name="Standard"><text:span text:style-name="T20">9</text:span><text:span text:style-name="T18"> And saith unto him, </text:span><text:span text:style-name="T19">All these things will I give thee</text:span><text:span text:style-name="T18">, if thou wilt fall down and </text:span><text:span text:style-name="T7">worship me</text:span><text:span text:style-name="T18">. </text:span></text:p>
      <text:p text:style-name="Standard"><text:span text:style-name="T20">10</text:span><text:span text:style-name="T18"> Then saith Jesus unto him,</text:span> "<text:span text:style-name="T15">Get thee hence, Satan: for it is written, </text:span><text:span text:style-name="T16">Thou shalt worship the Lord thy God, and him only shalt thou serve.</text:span>"</text:p>
      <text:p text:style-name="Standard"/>
      <text:p text:style-name="Standard"/>
      <text:p text:style-name="Standard"><text:soft-page-break/><text:span text:style-name="T10">Luke 9:23 </text:span>And he said to them all, "<text:span text:style-name="T15">If any man will come after me, let him deny himself, and take up his cross daily, and follow me.</text:span>"</text:p>
      <text:p text:style-name="Standard"/>
      <text:p text:style-name="Standard"><text:span text:style-name="T2">I Corinthians 15:31</text:span> I protest by your rejoicing which I have in Christ Jesus our Lord, <text:span text:style-name="T19">I die daily</text:span>.</text:p>
      <text:p text:style-name="Standard"/>
      <text:p text:style-name="P3">Romans 8:5-9</text:p>
      <text:p text:style-name="Standard"><text:span text:style-name="T10">5 </text:span>For they that are <text:span text:style-name="T18">after the </text:span><text:span text:style-name="T21">flesh</text:span><text:span text:style-name="T18"> do </text:span><text:span text:style-name="T21">min</text:span><text:span text:style-name="T22">d the things</text:span><text:span text:style-name="T18"> of the </text:span><text:span text:style-name="T21">flesh</text:span><text:span text:style-name="T18">; but they that are after the </text:span><text:span text:style-name="T5">Spirit</text:span><text:span text:style-name="T18"> the things of the </text:span><text:span text:style-name="T5">Spirit</text:span><text:span text:style-name="T18">.</text:span></text:p>
      <text:p text:style-name="Standard"><text:span text:style-name="T20">6</text:span><text:span text:style-name="T18"> For to be </text:span><text:span text:style-name="T21">carnally minded</text:span><text:span text:style-name="T18"> is </text:span><text:span text:style-name="T21">death</text:span><text:span text:style-name="T18">; but to be </text:span><text:span text:style-name="T5">spiritually minded</text:span><text:span text:style-name="T18"> is </text:span><text:span text:style-name="T5">life</text:span><text:span text:style-name="T18"> and </text:span><text:span text:style-name="T5">peace</text:span><text:span text:style-name="T18">. </text:span></text:p>
      <text:p text:style-name="Standard"><text:span text:style-name="T10">7</text:span> Because the <text:span text:style-name="T21">carnal mind</text:span> is <text:span text:style-name="T21">enmity against God</text:span>: for it is not subject to the law of God, neither indeed can be. </text:p>
      <text:p text:style-name="Standard"><text:span text:style-name="T20">8</text:span><text:span text:style-name="T18"> So then they that are in the </text:span><text:span text:style-name="T21">flesh</text:span> <text:span text:style-name="T21">cannot please God</text:span>. </text:p>
      <text:p text:style-name="Standard"><text:span text:style-name="T10">9</text:span> But ye are not in the flesh, but in the Spirit, if so be that the Spirit of God dwell in you. Now if any man have not the Spirit of Christ, he is none of his.</text:p>
      <text:p text:style-name="Standard"/>
      <text:p text:style-name="Standard">See study on John 5:3 for additional refer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3in" fo:margin-left="0.3in" fo:margin-right="0.3in" style:writing-mode="lr-tb" style:layout-grid-color="#c0c0c0" style:layout-grid-lines="1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1T09:32:25</meta:creation-date>
    <dc:language>en-US</dc:language>
    <dc:date>2026-07-11T12:31:30.121406039</dc:date>
    <meta:editing-cycles>188</meta:editing-cycles>
    <meta:editing-duration>PT12H44M</meta:editing-duration>
    <meta:generator>LibreOffice/26.2.4.2$Linux_X86_64 LibreOffice_project/64a984c51f4702dbd3710b13428c673a2f1292e7</meta:generator>
    <meta:document-statistic meta:table-count="1" meta:image-count="0" meta:object-count="0" meta:page-count="3" meta:paragraph-count="70" meta:word-count="1317" meta:character-count="6877" meta:non-whitespace-character-count="5627"/>
    <meta:user-defined meta:name="AppVersion">15.0000</meta:user-defined>
  </office:meta>
</office:document-meta>
</file>