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Fonts/Font_Liberation_Sans_1.ttf" manifest:media-type="application/x-font-ttf"/>
  <manifest:file-entry manifest:full-path="Fonts/Font_Liberation_Sans_2.ttf" manifest:media-type="application/x-font-ttf"/>
  <manifest:file-entry manifest:full-path="Fonts/Font_Noto_Sans_Devanagari_1.ttf" manifest:media-type="application/x-font-ttf"/>
  <manifest:file-entry manifest:full-path="Fonts/Font_Liberation_Sans_3.ttf" manifest:media-type="application/x-font-ttf"/>
  <manifest:file-entry manifest:full-path="Fonts/Font_Noto_Sans_Devanagari_2.ttf" manifest:media-type="application/x-font-ttf"/>
  <manifest:file-entry manifest:full-path="Fonts/Font_Liberation_Sans_4.ttf" manifest:media-type="application/x-font-ttf"/>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Devanagari" svg:font-family="'Noto Sans Devanagari'" style:font-family-generic="swiss">
      <svg:font-face-src>
        <svg:font-face-uri xlink:href="Fonts/Font_Noto_Sans_Devanagari_1.ttf" xlink:type="simple" loext:font-style="normal" loext:font-weight="normal">
          <svg:font-face-format svg:string="truetype"/>
        </svg:font-face-uri>
        <svg:font-face-uri xlink:href="Fonts/Font_Noto_Sans_Devanagari_2.ttf" xlink:type="simple" loext:font-style="normal" loext:font-weight="bold">
          <svg:font-face-format svg:string="truetype"/>
        </svg:font-face-uri>
      </svg:font-face-src>
    </style:font-face>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P1" style:family="paragraph" style:parent-style-name="Standard">
      <style:text-properties fo:font-size="13pt" style:font-size-asian="11.3500003814697pt" style:font-size-complex="13pt"/>
    </style:style>
    <style:style style:name="P2" style:family="paragraph" style:parent-style-name="Standard">
      <style:paragraph-properties fo:text-align="center" style:justify-single-word="false"/>
      <style:text-properties fo:font-size="13pt" officeooo:rsid="000ce2ab" officeooo:paragraph-rsid="000ce2ab" style:font-size-asian="11.3500003814697pt" style:font-size-complex="13pt"/>
    </style:style>
    <style:style style:name="P3" style:family="paragraph" style:parent-style-name="Standard">
      <style:paragraph-properties fo:text-align="center" style:justify-single-word="false"/>
      <style:text-properties fo:font-size="13pt" officeooo:rsid="0010e055" officeooo:paragraph-rsid="001152a4" style:font-size-asian="11.3500003814697pt" style:font-size-complex="13pt"/>
    </style:style>
    <style:style style:name="P4" style:family="paragraph" style:parent-style-name="Standard">
      <style:paragraph-properties fo:text-align="center" style:justify-single-word="false"/>
      <style:text-properties fo:font-size="13pt" officeooo:rsid="0018500c" officeooo:paragraph-rsid="0018500c" style:font-size-asian="11.3500003814697pt" style:font-size-complex="13pt"/>
    </style:style>
    <style:style style:name="P5" style:family="paragraph" style:parent-style-name="Standard">
      <style:paragraph-properties fo:text-align="center" style:justify-single-word="false"/>
      <style:text-properties fo:font-size="13pt" officeooo:rsid="001b809a" officeooo:paragraph-rsid="001b809a" style:font-size-asian="11.3500003814697pt" style:font-size-complex="13pt"/>
    </style:style>
    <style:style style:name="P6" style:family="paragraph" style:parent-style-name="Standard">
      <style:text-properties fo:font-size="13pt" officeooo:rsid="001fefcd" officeooo:paragraph-rsid="001fefcd" style:font-size-asian="11.3500003814697pt" style:font-size-complex="13pt"/>
    </style:style>
    <style:style style:name="P7" style:family="paragraph" style:parent-style-name="Standard">
      <style:paragraph-properties fo:text-align="center" style:justify-single-word="false"/>
      <style:text-properties fo:font-size="13pt" officeooo:rsid="00232340" officeooo:paragraph-rsid="00232340" style:font-size-asian="11.3500003814697pt" style:font-size-complex="13pt"/>
    </style:style>
    <style:style style:name="P8" style:family="paragraph" style:parent-style-name="Standard">
      <style:text-properties fo:font-size="13pt" officeooo:rsid="00250868" officeooo:paragraph-rsid="00250868" style:font-size-asian="11.3500003814697pt" style:font-size-complex="13pt"/>
    </style:style>
    <style:style style:name="P9" style:family="paragraph" style:parent-style-name="Table_20_Contents">
      <style:text-properties fo:font-size="13pt" style:font-size-asian="11.3500003814697pt" style:font-size-complex="13pt"/>
    </style:style>
    <style:style style:name="P10" style:family="paragraph" style:parent-style-name="Table_20_Contents">
      <style:text-properties fo:font-size="13pt" officeooo:paragraph-rsid="00197e93" style:font-size-asian="11.3500003814697pt" style:font-size-complex="13pt"/>
    </style:style>
    <style:style style:name="P11" style:family="paragraph" style:parent-style-name="Table_20_Contents">
      <style:text-properties fo:font-size="13pt" officeooo:paragraph-rsid="0029a8b9" style:font-size-asian="11.3500003814697pt" style:font-size-complex="13pt"/>
    </style:style>
    <style:style style:name="P12" style:family="paragraph" style:parent-style-name="Standard">
      <style:text-properties fo:color="#127622" loext:opacity="100%" fo:font-size="13pt" fo:font-weight="bold" style:font-size-asian="11.3500003814697pt" style:font-weight-asian="bold" style:font-size-complex="13pt" style:font-weight-complex="bold"/>
    </style:style>
    <style:style style:name="P13" style:family="paragraph" style:parent-style-name="Table_20_Contents">
      <style:text-properties fo:color="#127622" loext:opacity="100%" fo:font-size="13pt" style:font-size-asian="11.3500003814697pt" style:font-size-complex="13pt"/>
    </style:style>
    <style:style style:name="P14" style:family="paragraph" style:parent-style-name="Table_20_Contents">
      <style:text-properties fo:color="#127622" loext:opacity="100%" fo:font-size="13pt" officeooo:paragraph-rsid="001201f5" style:font-size-asian="11.3500003814697pt" style:font-size-complex="13pt"/>
    </style:style>
    <style:style style:name="P15" style:family="paragraph" style:parent-style-name="Table_20_Contents">
      <style:text-properties fo:color="#127622" loext:opacity="100%" fo:font-size="13pt" officeooo:paragraph-rsid="0018500c" style:font-size-asian="11.3500003814697pt" style:font-size-complex="13pt"/>
    </style:style>
    <style:style style:name="P16" style:family="paragraph" style:parent-style-name="Table_20_Contents">
      <style:text-properties fo:color="#127622" loext:opacity="100%" fo:font-size="13pt" officeooo:rsid="00250868" officeooo:paragraph-rsid="0029a8b9" style:font-size-asian="11.3500003814697pt" style:font-size-complex="13pt"/>
    </style:style>
    <style:style style:name="P17" style:family="paragraph" style:parent-style-name="Table_20_Contents">
      <style:text-properties fo:color="#127622" loext:opacity="100%" fo:font-size="13pt" officeooo:rsid="00250868" style:font-size-asian="11.3500003814697pt" style:font-size-complex="13pt"/>
    </style:style>
    <style:style style:name="P18" style:family="paragraph" style:parent-style-name="Table_20_Contents">
      <style:text-properties fo:color="#127622" loext:opacity="100%" fo:font-size="13pt" officeooo:paragraph-rsid="00197e93" style:font-size-asian="11.3500003814697pt" style:font-size-complex="13pt"/>
    </style:style>
    <style:style style:name="P19" style:family="paragraph" style:parent-style-name="Table_20_Contents">
      <style:text-properties fo:color="#127622" loext:opacity="100%" fo:font-size="13pt" officeooo:paragraph-rsid="0021490d" style:font-size-asian="11.3500003814697pt" style:font-size-complex="13pt"/>
    </style:style>
    <style:style style:name="P20" style:family="paragraph" style:parent-style-name="Table_20_Contents">
      <style:text-properties fo:color="#127622" loext:opacity="100%" fo:font-size="13pt" officeooo:paragraph-rsid="00232340" style:font-size-asian="11.3500003814697pt" style:font-size-complex="13pt"/>
    </style:style>
    <style:style style:name="P21" style:family="paragraph" style:parent-style-name="Table_20_Contents">
      <style:text-properties officeooo:paragraph-rsid="0018500c"/>
    </style:style>
    <style:style style:name="P22" style:family="paragraph" style:parent-style-name="Table_20_Contents">
      <style:text-properties officeooo:paragraph-rsid="0029a8b9"/>
    </style:style>
    <style:style style:name="P23" style:family="paragraph" style:parent-style-name="Standard" style:list-style-name="L1">
      <style:text-properties officeooo:paragraph-rsid="002a5644"/>
    </style:style>
    <style:style style:name="P24" style:family="paragraph" style:parent-style-name="Standard" style:list-style-name="L1">
      <style:text-properties officeooo:paragraph-rsid="002da6f7"/>
    </style:style>
    <style:style style:name="P25" style:family="paragraph" style:parent-style-name="Standard" style:list-style-name="L1">
      <style:text-properties fo:font-size="13pt" officeooo:rsid="00232340" officeooo:paragraph-rsid="00232340" style:font-size-asian="11.3500003814697pt" style:font-size-complex="13pt"/>
    </style:style>
    <style:style style:name="P26" style:family="paragraph" style:parent-style-name="Standard">
      <style:text-properties fo:font-size="13pt" officeooo:rsid="00232340" officeooo:paragraph-rsid="00232340" style:font-size-asian="11.3500003814697pt" style:font-size-complex="13pt"/>
    </style:style>
    <style:style style:name="P27" style:family="paragraph" style:parent-style-name="Standard" style:list-style-name="L1">
      <style:text-properties fo:font-size="13pt" officeooo:rsid="002478b8" officeooo:paragraph-rsid="002478b8" style:font-size-asian="11.3500003814697pt" style:font-size-complex="13pt"/>
    </style:style>
    <style:style style:name="P28" style:family="paragraph" style:parent-style-name="Standard" style:list-style-name="L1">
      <style:text-properties fo:font-size="13pt" officeooo:rsid="002478b8" officeooo:paragraph-rsid="002da6f7" style:font-size-asian="11.3500003814697pt" style:font-size-complex="13pt"/>
    </style:style>
    <style:style style:name="P29" style:family="paragraph" style:parent-style-name="Standard" style:list-style-name="L1">
      <style:text-properties fo:font-size="13pt" officeooo:rsid="00250868" officeooo:paragraph-rsid="00250868" style:font-size-asian="11.3500003814697pt" style:font-size-complex="13pt"/>
    </style:style>
    <style:style style:name="P30" style:family="paragraph" style:parent-style-name="Standard" style:list-style-name="L1">
      <style:text-properties fo:font-size="13pt" officeooo:rsid="00250868" officeooo:paragraph-rsid="002a5644" style:font-size-asian="11.3500003814697pt" style:font-size-complex="13pt"/>
    </style:style>
    <style:style style:name="P31" style:family="paragraph" style:parent-style-name="Standard">
      <style:text-properties fo:font-size="13pt" officeooo:rsid="00250868" officeooo:paragraph-rsid="00250868" style:font-size-asian="11.3500003814697pt" style:font-size-complex="13pt"/>
    </style:style>
    <style:style style:name="P32" style:family="paragraph" style:parent-style-name="Standard">
      <style:text-properties fo:font-size="13pt" officeooo:rsid="001fefcd" officeooo:paragraph-rsid="001fefcd" style:font-size-asian="11.3500003814697pt" style:font-size-complex="13pt"/>
    </style:style>
    <style:style style:name="P33" style:family="paragraph" style:parent-style-name="Standard">
      <style:paragraph-properties fo:text-align="center" style:justify-single-word="false" fo:break-before="page"/>
      <style:text-properties fo:font-size="13pt" officeooo:rsid="002ff12c" officeooo:paragraph-rsid="00250868" style:font-size-asian="11.3500003814697pt" style:font-size-complex="13pt"/>
    </style:style>
    <style:style style:name="P34" style:family="paragraph" style:parent-style-name="Standard">
      <style:paragraph-properties fo:text-align="center" style:justify-single-word="false"/>
      <style:text-properties fo:font-size="13pt" officeooo:rsid="003c8baf" officeooo:paragraph-rsid="003c8baf" style:font-size-asian="11.3500003814697pt" style:font-size-complex="13pt"/>
    </style:style>
    <style:style style:name="P35" style:family="paragraph" style:parent-style-name="Standard" style:list-style-name="L1">
      <style:text-properties fo:color="#127622" loext:opacity="100%" fo:font-size="13pt" officeooo:rsid="00250868" officeooo:paragraph-rsid="00250868" style:font-size-asian="11.3500003814697pt" style:font-size-complex="13pt"/>
    </style:style>
    <style:style style:name="P36" style:family="paragraph" style:parent-style-name="Standard">
      <style:paragraph-properties fo:text-align="center" style:justify-single-word="false"/>
      <style:text-properties officeooo:paragraph-rsid="0033f9ab"/>
    </style:style>
    <style:style style:name="P37" style:family="paragraph" style:parent-style-name="Standard">
      <style:paragraph-properties fo:text-align="center" style:justify-single-word="false" fo:break-before="page"/>
      <style:text-properties officeooo:rsid="0033f9ab" officeooo:paragraph-rsid="0033f9ab"/>
    </style:style>
    <style:style style:name="P38" style:family="paragraph" style:parent-style-name="Standard">
      <style:paragraph-properties fo:break-before="page"/>
      <style:text-properties officeooo:paragraph-rsid="00232340"/>
    </style:style>
    <style:style style:name="P39" style:family="paragraph" style:parent-style-name="Standard">
      <style:text-properties officeooo:paragraph-rsid="0038f16b"/>
    </style:style>
    <style:style style:name="P40" style:family="paragraph" style:parent-style-name="Standard">
      <style:text-properties officeooo:paragraph-rsid="003c8baf"/>
    </style:style>
    <style:style style:name="P41" style:family="paragraph" style:parent-style-name="Table_20_Contents">
      <style:text-properties officeooo:paragraph-rsid="00319162"/>
    </style:style>
    <style:style style:name="P42" style:family="paragraph" style:parent-style-name="Table_20_Contents">
      <style:text-properties fo:color="#c9211e" loext:opacity="100%" fo:font-size="13pt" officeooo:paragraph-rsid="00232340" style:font-size-asian="11.3500003814697pt" style:font-size-complex="13pt"/>
    </style:style>
    <style:style style:name="P43" style:family="paragraph" style:parent-style-name="Table_20_Contents">
      <style:text-properties officeooo:paragraph-rsid="001201f5"/>
    </style:style>
    <style:style style:name="P44" style:family="paragraph" style:parent-style-name="Table_20_Contents">
      <style:text-properties fo:color="#127622" loext:opacity="100%" fo:font-size="13pt" officeooo:paragraph-rsid="0033f9ab" style:font-size-asian="11.3500003814697pt" style:font-size-complex="13pt"/>
    </style:style>
    <style:style style:name="P45" style:family="paragraph" style:parent-style-name="Table_20_Contents">
      <style:text-properties officeooo:paragraph-rsid="0033f9ab"/>
    </style:style>
    <style:style style:name="T1" style:family="text">
      <style:text-properties fo:font-size="13pt" style:font-size-asian="11.3500003814697pt" style:font-size-complex="13pt"/>
    </style:style>
    <style:style style:name="T2" style:family="text">
      <style:text-properties fo:font-size="13pt" officeooo:rsid="0021490d" style:font-size-asian="11.3500003814697pt" style:font-size-complex="13pt"/>
    </style:style>
    <style:style style:name="T3" style:family="text">
      <style:text-properties fo:font-size="13pt" officeooo:rsid="002478b8" style:font-size-asian="11.3500003814697pt" style:font-size-complex="13pt"/>
    </style:style>
    <style:style style:name="T4" style:family="text">
      <style:text-properties fo:font-size="13pt" officeooo:rsid="00250868" style:font-size-asian="11.3500003814697pt" style:font-size-complex="13pt"/>
    </style:style>
    <style:style style:name="T5" style:family="text">
      <style:text-properties fo:font-size="13pt" officeooo:rsid="00232340" style:font-size-asian="11.3500003814697pt" style:font-size-complex="13pt"/>
    </style:style>
    <style:style style:name="T6" style:family="text">
      <style:text-properties fo:font-size="13pt" officeooo:rsid="0029a8b9" style:font-size-asian="11.3500003814697pt" style:font-size-complex="13pt"/>
    </style:style>
    <style:style style:name="T7" style:family="text">
      <style:text-properties fo:font-size="13pt" officeooo:rsid="002a5644" style:font-size-asian="11.3500003814697pt" style:font-size-complex="13pt"/>
    </style:style>
    <style:style style:name="T8" style:family="text">
      <style:text-properties fo:font-size="13pt" officeooo:rsid="002da6f7" style:font-size-asian="11.3500003814697pt" style:font-size-complex="13pt"/>
    </style:style>
    <style:style style:name="T9" style:family="text">
      <style:text-properties fo:font-size="13pt" officeooo:rsid="00319162" style:font-size-asian="11.3500003814697pt" style:font-size-complex="13pt"/>
    </style:style>
    <style:style style:name="T10" style:family="text">
      <style:text-properties fo:font-size="13pt" officeooo:rsid="0038f16b" style:font-size-asian="11.3500003814697pt" style:font-size-complex="13pt"/>
    </style:style>
    <style:style style:name="T11" style:family="text">
      <style:text-properties fo:font-size="13pt" officeooo:rsid="003a17bd" style:font-size-asian="11.3500003814697pt" style:font-size-complex="13pt"/>
    </style:style>
    <style:style style:name="T12" style:family="text">
      <style:text-properties fo:font-size="13pt" fo:background-color="#ffff00" loext:char-shading-value="0" style:font-size-asian="11.3500003814697pt" style:font-size-complex="13pt"/>
    </style:style>
    <style:style style:name="T13" style:family="text">
      <style:text-properties fo:font-size="13pt" fo:background-color="#ffff00" loext:char-shading-value="0" style:font-size-asian="11.3500003814697pt" style:font-size-complex="13pt"/>
    </style:style>
    <style:style style:name="T14" style:family="text">
      <style:text-properties fo:font-size="13pt" fo:background-color="transparent" loext:char-shading-value="0" style:font-size-asian="11.3500003814697pt" style:font-size-complex="13pt"/>
    </style:style>
    <style:style style:name="T15" style:family="text">
      <style:text-properties fo:font-size="13pt" fo:background-color="#ff4000" loext:char-shading-value="0" style:font-size-asian="11.3500003814697pt" style:font-size-complex="13pt"/>
    </style:style>
    <style:style style:name="T16" style:family="text">
      <style:text-properties fo:color="#127622" loext:opacity="100%"/>
    </style:style>
    <style:style style:name="T17" style:family="text">
      <style:text-properties fo:color="#127622" loext:opacity="100%" fo:font-size="13pt" style:font-size-asian="11.3500003814697pt" style:font-size-complex="13pt"/>
    </style:style>
    <style:style style:name="T18" style:family="text">
      <style:text-properties fo:color="#127622" loext:opacity="100%" fo:font-size="13pt" officeooo:rsid="00250868" style:font-size-asian="11.3500003814697pt" style:font-size-complex="13pt"/>
    </style:style>
    <style:style style:name="T19" style:family="text">
      <style:text-properties fo:color="#127622" loext:opacity="100%" fo:font-size="13pt" officeooo:rsid="002cf65a" style:font-size-asian="11.3500003814697pt" style:font-size-complex="13pt"/>
    </style:style>
    <style:style style:name="T20" style:family="text">
      <style:text-properties fo:background-color="#ffff00" loext:char-shading-value="0"/>
    </style:style>
    <style:style style:name="T21" style:family="text">
      <style:text-properties fo:background-color="#ffff00" loext:char-shading-value="0"/>
    </style:style>
    <style:style style:name="T22" style:family="text">
      <style:text-properties officeooo:rsid="001b2c14"/>
    </style:style>
    <style:style style:name="T23" style:family="text">
      <style:text-properties officeooo:rsid="001df9b7"/>
    </style:style>
    <style:style style:name="T24" style:family="text">
      <style:text-properties officeooo:rsid="002638ca"/>
    </style:style>
    <style:style style:name="T25" style:family="text">
      <style:text-properties officeooo:rsid="002a5644"/>
    </style:style>
    <style:style style:name="T26" style:family="text">
      <style:text-properties officeooo:rsid="002da6f7"/>
    </style:style>
    <style:style style:name="T27" style:family="text">
      <style:text-properties officeooo:rsid="002e4b6a"/>
    </style:style>
    <style:style style:name="T28" style:family="text">
      <style:text-properties officeooo:rsid="00319162"/>
    </style:style>
    <style:style style:name="T29" style:family="text">
      <style:text-properties style:text-position="super 58%" fo:font-size="13pt" officeooo:rsid="00319162" fo:background-color="transparent" loext:char-shading-value="0" style:font-size-asian="11.3500003814697pt" style:font-size-complex="13pt"/>
    </style:style>
    <style:style style:name="T30" style:family="text">
      <style:text-properties officeooo:rsid="0016708e"/>
    </style:style>
    <style:style style:name="T31" style:family="text">
      <style:text-properties officeooo:rsid="0035e22c"/>
    </style:style>
    <style:style style:name="T32" style:family="text">
      <style:text-properties officeooo:rsid="00361d6c"/>
    </style:style>
    <style:style style:name="T33" style:family="text">
      <style:text-properties officeooo:rsid="003bf457"/>
    </style:style>
    <style:style style:name="T34" style:family="text">
      <style:text-properties officeooo:rsid="003c8ba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saiah 40:31</text:p>
      <text:p text:style-name="P1">But they that wait upon the LORD shall renew their strength; they shall mount up with wings as eagles; they shall run, and not be weary; and they shall walk, and not faint.</text:p>
      <text:p text:style-name="P1"/>
      <text:p text:style-name="P2">Verses 30 and 31 are one sentence.</text:p>
      <table:table table:name="Table1" table:style-name="Table1">
        <table:table-column table:style-name="Table1.A"/>
        <table:table-row>
          <table:table-cell table:style-name="Table1.A1" office:value-type="string">
            <text:p text:style-name="P13">Isaiah 40:30-31</text:p>
            <text:p text:style-name="Table_20_Contents"><text:span text:style-name="T1">Even the youths shall faint and be weary, and the young men shall utterly fall: [</text:span><text:span text:style-name="T17">31</text:span><text:span text:style-name="T1">] But they that wait upon the LORD shall renew their strength; they shall mount up with wings as eagles; they shall run, and not be weary; and they shall walk, and not faint.</text:span></text:p>
          </table:table-cell>
        </table:table-row>
      </table:table>
      <text:p text:style-name="P1"/>
      <text:p text:style-name="P3">Verses 12-31 are all one topic</text:p>
      <table:table table:name="Table2" table:style-name="Table2">
        <table:table-column table:style-name="Table2.A"/>
        <table:table-row>
          <table:table-cell table:style-name="Table2.A1" office:value-type="string">
            <text:p text:style-name="P13">Isaiah 40:12-31</text:p>
            <text:p text:style-name="Table_20_Contents"><text:span text:style-name="T1">Who hath measured the waters in the hollow of his hand, and meted out heaven with the span, and comprehended the dust of the earth in a measure, and weighed the mountains in scales, and the hills in a balance? [</text:span><text:span text:style-name="T17">13</text:span><text:span text:style-name="T1">] Who hath directed the Spirit of the LORD, or being his counsellor hath taught him? [</text:span><text:span text:style-name="T17">14</text:span><text:span text:style-name="T1">] With whom took he counsel, and who instructed him, and taught him in the path of judgment, and taught him knowledge, and shewed to him the way of understanding? [</text:span><text:span text:style-name="T17">15</text:span><text:span text:style-name="T1">] Behold, the nations are as a drop of a bucket, and are counted as the small dust of the balance: behold, he taketh up the isles as a very little thing. [</text:span><text:span text:style-name="T17">16</text:span><text:span text:style-name="T1">] And Lebanon is not sufficient to burn, nor the beasts thereof sufficient for a burnt offering. [</text:span><text:span text:style-name="T17">17</text:span><text:span text:style-name="T1">] All nations before him are as nothing; and they are counted to him less than nothing, and vanity. [</text:span><text:span text:style-name="T17">18</text:span><text:span text:style-name="T1">] To whom then will ye liken God? or what likeness will ye compare unto him? [</text:span><text:span text:style-name="T17">19</text:span><text:span text:style-name="T1">] The workman melteth a graven image, and the goldsmith spreadeth it over with gold, and casteth silver chains. [</text:span><text:span text:style-name="T17">20</text:span><text:span text:style-name="T1">] He that is so impoverished that he hath no oblation chooseth a tree that will not rot; he seeketh unto him a cunning workman to prepare a graven image, that shall not be moved. [</text:span><text:span text:style-name="T17">21</text:span><text:span text:style-name="T1">] Have ye not known? have ye not heard? hath it not been told you from the beginning? have ye not understood from the foundations of the earth? [</text:span><text:span text:style-name="T17">22</text:span><text:span text:style-name="T1">] It is he that sitteth upon the circle of the earth, and the inhabitants thereof are as grasshoppers; that stretcheth out the heavens as a curtain, and spreadeth them out as a tent to dwell in: [</text:span><text:span text:style-name="T17">23</text:span><text:span text:style-name="T1">] That bringeth the princes to nothing; he maketh the judges of the earth as vanity. [</text:span><text:span text:style-name="T17">24</text:span><text:span text:style-name="T1">] Yea, they shall not be planted; yea, they shall not be sown: yea, their stock shall not take root in the earth: and he shall also blow upon them, and they shall wither, and the whirlwind shall take them away as stubble. [</text:span><text:span text:style-name="T17">25</text:span><text:span text:style-name="T1">] To whom then will ye liken me, or shall I be equal? saith the Holy One. [</text:span><text:span text:style-name="T17">26</text:span><text:span text:style-name="T1">] Lift up your eyes on high, and behold who hath created these things, that bringeth out their host by number: he calleth them all by names by the greatness of his might, for that he is strong in power; not one faileth. [</text:span><text:span text:style-name="T17">27</text:span><text:span text:style-name="T1">] Why sayest thou, O Jacob, and speakest, O Israel, My way is hid from the LORD, and my judgment is passed over from my God? [</text:span><text:span text:style-name="T17">28</text:span><text:span text:style-name="T1">] Hast thou not known? hast thou not heard, that the everlasting God, the LORD, the Creator of the ends of the earth, fainteth not, neither is weary? there is no searching of his understanding. [</text:span><text:span text:style-name="T17">29</text:span><text:span text:style-name="T1">] He giveth power to the faint; and to them that have no might he increaseth strength. [</text:span><text:span text:style-name="T17">30</text:span><text:span text:style-name="T1">] Even the youths shall faint and be weary, and the young men shall utterly fall: [</text:span><text:span text:style-name="T17">31</text:span><text:span text:style-name="T1">] But they that wait upon the LORD shall renew their strength; they shall mount up with wings as eagles; they shall run, and not be weary; and they shall walk, and not faint.</text:span></text:p>
          </table:table-cell>
        </table:table-row>
      </table:table>
      <text:p text:style-name="P1"/>
      <text:p text:style-name="P7">God’s hand saving the Israelites is described as bearing them on eagles’ wings</text:p>
      <table:table table:name="Table9" table:style-name="Table9">
        <table:table-column table:style-name="Table9.A"/>
        <table:table-row>
          <table:table-cell table:style-name="Table9.A1" office:value-type="string">
            <text:p text:style-name="P20">Exodus 19:4</text:p>
            <text:p text:style-name="P42">Ye have seen what I did unto the Egyptians, and how I bare you on eagles’ wings, and brought you unto myself.</text:p>
          </table:table-cell>
        </table:table-row>
      </table:table>
      <text:p text:style-name="P1"/>
      <text:p text:style-name="P37">Those who <text:span text:style-name="T33">do </text:span>not seek the counsel of God are described as “rebellious children”</text:p>
      <table:table table:name="Table3" table:style-name="Table3">
        <table:table-column table:style-name="Table3.A"/>
        <table:table-row>
          <table:table-cell table:style-name="Table3.A1" office:value-type="string">
            <text:p text:style-name="P14">Isaiah 30:1</text:p>
            <text:p text:style-name="P43"><text:span text:style-name="T13">Woe to the rebellious children</text:span><text:span text:style-name="T1">, saith the LORD, </text:span><text:span text:style-name="T13">that take counsel, but not of me</text:span><text:span text:style-name="T1">; and that cover with a covering, but not of my spirit, that they may add sin to sin:</text:span></text:p>
          </table:table-cell>
        </table:table-row>
      </table:table>
      <text:p text:style-name="P36"/>
      <text:p text:style-name="P36"><text:span text:style-name="T30">Quietness of spirit </text:span><text:span text:style-name="T32">and</text:span><text:span text:style-name="T30"> confidence in God </text:span><text:span text:style-name="T31">is our strength.</text:span></text:p>
      <table:table table:name="Table4" table:style-name="Table4">
        <table:table-column table:style-name="Table4.A"/>
        <table:table-row>
          <table:table-cell table:style-name="Table4.A1" office:value-type="string">
            <text:p text:style-name="P44">Isaiah 30:15-16</text:p>
            <text:p text:style-name="P45">For thus saith the Lord GOD, the Holy One of Israel; In returning and rest shall ye be saved; <text:span text:style-name="T20">in quietness and in confidence shall be your strength</text:span>: and ye would not. [<text:span text:style-name="T16">16</text:span>] But ye said, No; for we will flee upon horses; therefore shall ye flee: and, We will ride upon the swift; therefore shall they that pursue you be swift.</text:p>
          </table:table-cell>
        </table:table-row>
      </table:table>
      <text:p text:style-name="P1"/>
      <text:p text:style-name="P4">Egypt is a typology of our life before being saved. <text:span text:style-name="T23">It can also represent the world or the wisdom of the world.</text:span></text:p>
      <table:table table:name="Table5" table:style-name="Table5">
        <table:table-column table:style-name="Table5.A"/>
        <table:table-row>
          <table:table-cell table:style-name="Table5.A1" office:value-type="string">
            <text:p text:style-name="P15">Isaiah 31:1</text:p>
            <text:p text:style-name="P21"><text:span text:style-name="T21">Woe to them that go down to Egypt for help</text:span>; and stay on horses, and trust in chariots, because they are many; and in horsemen, because they are very strong; but they look not unto the Holy One of Israel, neither seek the LORD!</text:p>
          </table:table-cell>
        </table:table-row>
      </table:table>
      <text:p text:style-name="P1"/>
      <text:p text:style-name="P5">Trusting in the world, the wisdom of it, or the wisdom from ourselves is a bad idea. <text:span text:style-name="T34">Additionally, the book of proverbs is full of warnings against not seeking the wisdom that is from above.</text:span></text:p>
      <table:table table:name="Table6" table:style-name="Table6">
        <table:table-column table:style-name="Table6.A"/>
        <table:table-row>
          <table:table-cell table:style-name="Table6.A1" office:value-type="string">
            <text:p text:style-name="P18">I Corinthians 3:19</text:p>
            <text:p text:style-name="P10">For <text:span text:style-name="T20">the wisdom of this world is foolishness with God</text:span>. For it is written, He taketh the wise in their own craftiness.</text:p>
          </table:table-cell>
        </table:table-row>
        <table:table-row>
          <table:table-cell table:style-name="Table6.A2" office:value-type="string">
            <text:p text:style-name="P18">I Corinthians 2:6</text:p>
            <text:p text:style-name="P10">Howbeit we speak wisdom among them that are perfect: <text:span text:style-name="T20">yet not the wisdom of this world</text:span>, nor of the princes of this world, <text:span text:style-name="T20">that come to nought</text:span>: </text:p>
          </table:table-cell>
        </table:table-row>
        <table:table-row>
          <table:table-cell table:style-name="Table6.A2" office:value-type="string">
            <text:p text:style-name="P18">Proverbs 3:5,6</text:p>
            <text:p text:style-name="P10">Trust in the Lord with all thine heart; and <text:span text:style-name="T20">lean not unto thine own understanding</text:span>. <text:span text:style-name="T22">[6] </text:span>In all thy ways acknowledge him, and he shall direct thy paths.</text:p>
          </table:table-cell>
        </table:table-row>
      </table:table>
      <text:p text:style-name="P1"/>
      <text:p text:style-name="P6">Waiting on the Lord implies that we are expecting something from Him. We can expect God to do what He said He would, which we can learn about in scripture, and if we pray as scripture tells us to we can also expect Him to answer that prayer.</text:p>
      <text:p text:style-name="P6"/>
      <text:p text:style-name="P34">What does waiting on God look like?</text:p>
      <table:table table:name="Table7" table:style-name="Table7">
        <table:table-column table:style-name="Table7.A"/>
        <table:table-row>
          <table:table-cell table:style-name="Table7.A1" office:value-type="string">
            <text:p text:style-name="P19">Hebrews 4:9-11</text:p>
            <text:p text:style-name="P41"><text:span text:style-name="T1">There remaineth therefore a rest to the people of God. </text:span><text:span text:style-name="T2">[</text:span><text:span text:style-name="T17">10</text:span><text:span text:style-name="T2">] </text:span><text:span text:style-name="T1">For he that is entered into his rest, </text:span><text:span text:style-name="T13">he also hath ceased from his own works</text:span><text:span text:style-name="T1">, as God did from his. </text:span><text:span text:style-name="T2">[</text:span><text:span text:style-name="T17">11</text:span><text:span text:style-name="T2">]</text:span><text:span text:style-name="T1"> </text:span><text:span text:style-name="T13">Let us labour therefore to enter into that rest</text:span><text:span text:style-name="T1">, </text:span><text:span text:style-name="T15">lest any man fall after the same example of unbelief</text:span><text:span text:style-name="T29">(Hebrews 3)</text:span><text:span text:style-name="T1">.</text:span></text:p>
          </table:table-cell>
        </table:table-row>
      </table:table>
      <text:p text:style-name="P39"><text:span text:style-name="T5"/></text:p>
      <text:p text:style-name="P40"><text:span text:style-name="T5">If we are expecting something from God </text:span><text:span text:style-name="T10">(whether through prayer or a promise) </text:span><text:span text:style-name="T5">and we cease our own works </text:span><text:span text:style-name="T10">(stop moving, acting or speaking) </text:span><text:span text:style-name="T11">only </text:span><text:span text:style-name="T5">then are </text:span><text:span text:style-name="T11">we </text:span><text:span text:style-name="T5">waiting on Him.</text:span></text:p>
      <text:p text:style-name="P38"><text:span text:style-name="T5">It is in that waiting that we are told by </text:span><text:span text:style-name="T17">Isaiah 40:31</text:span><text:span text:style-name="T5"> that the following will happen:</text:span></text:p>
      <text:p text:style-name="P26"/>
      <table:table table:name="Table8" table:style-name="Table8">
        <table:table-column table:style-name="Table8.A"/>
        <table:table-row>
          <table:table-cell table:style-name="Table8.A1" office:value-type="string">
            <text:p text:style-name="P13">Isaiah 40:31</text:p>
            <text:p text:style-name="P9">But they that wait upon the LORD shall renew their strength; they shall mount up with wings as eagles; they shall run, and not be weary; and they shall walk, and not faint.</text:p>
          </table:table-cell>
        </table:table-row>
      </table:table>
      <text:p text:style-name="P26"/>
      <text:list text:style-name="L1">
        <text:list-item>
          <text:p text:style-name="P25">Renewed strength</text:p>
          <text:list>
            <text:list-item>
              <text:p text:style-name="P27">Physical from not exerting our own efforts</text:p>
            </text:list-item>
            <text:list-item>
              <text:p text:style-name="P27">Spiritual from the experience of drawing closer to God and putting our trust in Him</text:p>
            </text:list-item>
          </text:list>
        </text:list-item>
        <text:list-item>
          <text:p text:style-name="P27">Mount up with wings as eagles</text:p>
          <text:list>
            <text:list-item>
              <text:p text:style-name="P24"><text:span text:style-name="T8">Literal</text:span></text:p>
              <text:list>
                <text:list-item>
                  <text:p text:style-name="P24"><text:span text:style-name="T3">God’s hand will carry us </text:span><text:span text:style-name="T4">and guide us</text:span><text:span text:style-name="T3">, as it did the Israelites out of Egypt </text:span><text:span text:style-name="T4">(</text:span><text:span text:style-name="T17">Exo</text:span><text:span text:style-name="T19">dus</text:span><text:span text:style-name="T17"> 19:4</text:span><text:span text:style-name="T4">)</text:span></text:p>
                </text:list-item>
              </text:list>
            </text:list-item>
            <text:list-item>
              <text:p text:style-name="P28"><text:span text:style-name="T26">Figuratively</text:span></text:p>
              <text:list>
                <text:list-item>
                  <text:p text:style-name="P28">We’ll soar high above the world, our circumstances, and our problems. <text:span text:style-name="T26">Our confidence in God and His provision </text:span><text:span text:style-name="T27">supplants</text:span><text:span text:style-name="T26"> </text:span><text:span text:style-name="T28">all manner of evil such as </text:span><text:span text:style-name="T26">worry, doubt, fear, </text:span><text:span text:style-name="T27">anxiety, and more.</text:span></text:p>
                </text:list-item>
              </text:list>
            </text:list-item>
          </text:list>
        </text:list-item>
        <text:list-item>
          <text:p text:style-name="P29">Run and not be weary</text:p>
          <text:list>
            <text:list-item>
              <text:p text:style-name="P35">Hebrews 12:1,2</text:p>
            </text:list-item>
            <text:list-item>
              <text:p text:style-name="P30">We won’t grow weary (tired) in the <text:span text:style-name="T25">spiritual </text:span>marathon <text:span text:style-name="T25">(“run with patience”) </text:span>set before us</text:p>
            </text:list-item>
            <text:list-item>
              <text:p text:style-name="P23"><text:span text:style-name="T7">A life for Christ after being reborn is </text:span><text:span text:style-name="T9">ideally </text:span><text:span text:style-name="T7">a life of pursuing spiritual maturity as opposed to the “old creature” (</text:span><text:span text:style-name="T18">II Corinthians 5:17</text:span><text:span text:style-name="T7">) which pursued fleshy desires and was a servant of sin (</text:span><text:span text:style-name="T18">Romans 6:17,18</text:span><text:span text:style-name="T7">). </text:span><text:span text:style-name="T9">Note that this is a choice – Christ gives us the freedom and ability (“set free”) to serve Him instead of sin but we still have to choose.</text:span></text:p>
            </text:list-item>
          </text:list>
        </text:list-item>
        <text:list-item>
          <text:p text:style-name="P29">Walk and not faint</text:p>
          <text:list>
            <text:list-item>
              <text:p text:style-name="P29">Our walk is our life and to faint is to be disheartened, lose heart, to be feeble (weak), <text:span text:style-name="T24">depressed or discouraged.</text:span></text:p>
            </text:list-item>
          </text:list>
        </text:list-item>
      </text:list>
      <text:p text:style-name="P8"/>
      <text:p text:style-name="P33">More verses about waiting on the Lord.</text:p>
      <table:table table:name="Table10" table:style-name="Table10">
        <table:table-column table:style-name="Table10.A"/>
        <table:table-row>
          <table:table-cell table:style-name="Table10.A1" office:value-type="string">
            <text:p text:style-name="P16">Psalm 27:14</text:p>
            <text:p text:style-name="P11"><text:span text:style-name="T20">Wait on the Lord</text:span>: be of good courage, and <text:span text:style-name="T20">he shall strengthen thine heart</text:span>: wait, I say, on the Lord.</text:p>
          </table:table-cell>
        </table:table-row>
        <table:table-row>
          <table:table-cell table:style-name="Table10.A2" office:value-type="string">
            <text:p text:style-name="P16">Psalm 37:7</text:p>
            <text:p text:style-name="P11">Rest in the Lord, and wait patiently for him: <text:span text:style-name="T20">fret not thyself</text:span> because of him who prospereth in his way, because of the man who bringeth wicked devices to pass.</text:p>
          </table:table-cell>
        </table:table-row>
        <table:table-row>
          <table:table-cell table:style-name="Table10.A2" office:value-type="string">
            <text:p text:style-name="P16">Proverbs 20:22</text:p>
            <text:p text:style-name="P11">Say not thou, I will recompense evil; but <text:span text:style-name="T20">wait on the Lord</text:span>, and <text:span text:style-name="T20">he shall save thee</text:span>. </text:p>
          </table:table-cell>
        </table:table-row>
        <table:table-row>
          <table:table-cell table:style-name="Table10.A2" office:value-type="string">
            <text:p text:style-name="P16">Isaiah 30:18</text:p>
            <text:p text:style-name="P11">And therefore will the Lord wait, that he may be gracious unto you, and therefore will he be exalted, that he may have mercy upon you: for the Lord is a God of judgment: <text:span text:style-name="T20">blessed are all they that wait for him</text:span>.</text:p>
          </table:table-cell>
        </table:table-row>
        <table:table-row>
          <table:table-cell table:style-name="Table10.A2" office:value-type="string">
            <text:p text:style-name="P17">Isaiah 49:23</text:p>
            <text:p text:style-name="P9">And kings shall be thy nursing fathers, and their queens thy nursing mothers: they shall bow down to thee with their face toward the earth, and lick up the dust of thy feet; and thou shalt know that I am the LORD: for <text:span text:style-name="T20">they shall not be ashamed that wait for me</text:span>.</text:p>
          </table:table-cell>
        </table:table-row>
        <table:table-row>
          <table:table-cell table:style-name="Table10.A2" office:value-type="string">
            <text:p text:style-name="P16">Lamentations 3:25,26</text:p>
            <text:p text:style-name="P22"><text:span text:style-name="T1">The Lord </text:span><text:span text:style-name="T12">is good unto them that wait for him</text:span><text:span text:style-name="T1">, </text:span><text:span text:style-name="T14">to the soul that seeketh him</text:span><text:span text:style-name="T1">. </text:span><text:span text:style-name="T6">[</text:span><text:span text:style-name="T18">26</text:span><text:span text:style-name="T6">]</text:span><text:span text:style-name="T1"> It is good that a man should both </text:span><text:span text:style-name="T13">hope and quietly wait for the salvation of the Lord</text:span><text:span text:style-name="T1">.</text:span></text:p>
          </table:table-cell>
        </table:table-row>
        <table:table-row>
          <table:table-cell table:style-name="Table10.A2" office:value-type="string">
            <text:p text:style-name="P16">Hosea 12:6</text:p>
            <text:p text:style-name="P11">Therefore turn thou to thy God: keep mercy and judgment, and <text:span text:style-name="T20">wait on thy God continually</text:span>.</text:p>
          </table:table-cell>
        </table:table-row>
      </table:table>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3T07:04:25.811183402</meta:creation-date>
    <meta:editing-cycles>50</meta:editing-cycles>
    <meta:editing-duration>PT4H58M56S</meta:editing-duration>
    <dc:date>2023-12-05T10:44:04.268000000</dc:date>
    <meta:generator>LibreOffice/7.6.2.1$Windows_X86_64 LibreOffice_project/56f7684011345957bbf33a7ee678afaf4d2ba333</meta:generator>
    <meta:document-statistic meta:table-count="10" meta:image-count="0" meta:object-count="0" meta:page-count="4" meta:paragraph-count="64" meta:word-count="1616" meta:character-count="8509" meta:non-whitespace-character-count="6968"/>
  </office:meta>
</office:document-meta>
</file>