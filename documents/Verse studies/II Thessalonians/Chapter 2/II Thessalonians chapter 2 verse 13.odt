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3.6042in" style:rel-column-width="29898*"/>
    </style:style>
    <style:style style:name="Table3.B" style:family="table-column">
      <style:table-column-properties style:column-width="0.6875in" style:rel-column-width="5703*"/>
    </style:style>
    <style:style style:name="Table3.C" style:family="table-column">
      <style:table-column-properties style:column-width="3.6083in" style:rel-column-width="29934*"/>
    </style:style>
    <style:style style:name="Table3.A1" style:family="table-cell">
      <style:table-cell-properties fo:padding="0.0382in" fo:border-left="0.5pt solid #000000" fo:border-right="none" fo:border-top="0.5pt solid #000000" fo:border-bottom="none"/>
    </style:style>
    <style:style style:name="Table3.B1" style:family="table-cell">
      <style:table-cell-properties style:vertical-align="middle" fo:padding="0.0382in" fo:border-left="0.5pt solid #000000" fo:border-right="none" fo:border-top="0.5pt solid #000000" fo:border-bottom="none"/>
    </style:style>
    <style:style style:name="Table3.C1" style:family="table-cell">
      <style:table-cell-properties fo:padding="0.0382in" fo:border-left="0.5pt solid #000000" fo:border-right="0.5pt solid #000000" fo:border-top="0.5pt solid #000000" fo:border-bottom="none"/>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style:vertical-align="middle" fo:padding="0.0382in" fo:border-left="0.5pt solid #000000" fo:border-right="none" fo:border-top="none" fo:border-bottom="0.5pt solid #000000"/>
    </style:style>
    <style:style style:name="Table3.C2" style:family="table-cell">
      <style:table-cell-properties style:vertical-align="middle" fo:padding="0.0382in" fo:border-left="0.5pt solid #000000" fo:border-right="0.5pt solid #000000" fo:border-top="none" fo:border-bottom="0.5pt solid #000000"/>
    </style:style>
    <style:style style:name="P1" style:family="paragraph" style:parent-style-name="Standard">
      <style:text-properties fo:color="#127622" loext:opacity="100%" fo:font-size="13pt" fo:font-weight="bold" style:font-size-asian="13pt" style:font-weight-asian="bold" style:font-size-complex="13pt" style:font-weight-complex="bold"/>
    </style:style>
    <style:style style:name="P2" style:family="paragraph" style:parent-style-name="Table_20_Contents">
      <style:text-properties fo:color="#127622" loext:opacity="100%" fo:font-size="13pt" style:font-size-asian="13pt" style:font-size-complex="13pt"/>
    </style:style>
    <style:style style:name="P3" style:family="paragraph" style:parent-style-name="Standard">
      <style:text-properties fo:font-size="13pt" style:font-size-asian="13pt" style:font-size-complex="13pt"/>
    </style:style>
    <style:style style:name="P4" style:family="paragraph" style:parent-style-name="Standard">
      <style:text-properties fo:font-size="13pt" officeooo:rsid="003b80c5" officeooo:paragraph-rsid="003b80c5" style:font-size-asian="13pt" style:font-size-complex="13pt"/>
    </style:style>
    <style:style style:name="P5" style:family="paragraph" style:parent-style-name="Standard">
      <style:paragraph-properties fo:text-align="center" style:justify-single-word="false"/>
      <style:text-properties fo:font-size="13pt" officeooo:rsid="0041b891" officeooo:paragraph-rsid="0041b891" style:font-size-asian="13pt" style:font-size-complex="13pt"/>
    </style:style>
    <style:style style:name="P6" style:family="paragraph" style:parent-style-name="Standard">
      <style:text-properties fo:font-size="13pt" officeooo:rsid="00423ce4" officeooo:paragraph-rsid="00423ce4" style:font-size-asian="13pt" style:font-size-complex="13pt"/>
    </style:style>
    <style:style style:name="P7" style:family="paragraph" style:parent-style-name="Standard">
      <style:text-properties fo:font-size="13pt" officeooo:rsid="004a6241" officeooo:paragraph-rsid="004a6241" style:font-size-asian="13pt" style:font-size-complex="13pt"/>
    </style:style>
    <style:style style:name="P8" style:family="paragraph" style:parent-style-name="Standard">
      <style:text-properties fo:font-size="13pt" officeooo:rsid="004e2168" officeooo:paragraph-rsid="004e2168" style:font-size-asian="13pt" style:font-size-complex="13pt"/>
    </style:style>
    <style:style style:name="P9" style:family="paragraph" style:parent-style-name="Table_20_Contents">
      <style:paragraph-properties fo:text-align="center" style:justify-single-word="false"/>
      <style:text-properties fo:font-size="13pt" officeooo:rsid="003c2f1f" officeooo:paragraph-rsid="003c2f1f" style:font-size-asian="13pt" style:font-size-complex="13pt"/>
    </style:style>
    <style:style style:name="P10" style:family="paragraph" style:parent-style-name="Table_20_Contents">
      <style:paragraph-properties fo:text-align="center" style:justify-single-word="false"/>
      <style:text-properties fo:font-size="13pt" officeooo:rsid="003f3f8e" officeooo:paragraph-rsid="003f3f8e" style:font-size-asian="13pt" style:font-size-complex="13pt"/>
    </style:style>
    <style:style style:name="P11" style:family="paragraph" style:parent-style-name="Standard">
      <style:text-properties fo:font-size="13pt" style:text-underline-style="none" officeooo:rsid="00219ae6" officeooo:paragraph-rsid="00219ae6" style:font-size-asian="13pt" style:font-size-complex="13pt"/>
    </style:style>
    <style:style style:name="P12" style:family="paragraph" style:parent-style-name="Table_20_Contents">
      <style:text-properties officeooo:paragraph-rsid="00219ae6"/>
    </style:style>
    <style:style style:name="P13" style:family="paragraph" style:parent-style-name="Table_20_Contents">
      <style:text-properties officeooo:paragraph-rsid="002887f1"/>
    </style:style>
    <style:style style:name="P14" style:family="paragraph" style:parent-style-name="Standard" style:list-style-name="L3">
      <style:text-properties fo:font-size="13pt" officeooo:rsid="001b8019" officeooo:paragraph-rsid="003370c9" style:font-size-asian="13pt" style:font-size-complex="13pt"/>
    </style:style>
    <style:style style:name="P15" style:family="paragraph" style:parent-style-name="Standard" style:list-style-name="L3">
      <style:text-properties fo:font-size="13pt" officeooo:rsid="005a0de8" officeooo:paragraph-rsid="005a0de8" style:font-size-asian="13pt" style:font-size-complex="13pt"/>
    </style:style>
    <style:style style:name="P16" style:family="paragraph" style:parent-style-name="Standard" style:list-style-name="L2">
      <style:text-properties fo:font-size="13pt" officeooo:rsid="00432ae7" officeooo:paragraph-rsid="00432ae7" style:font-size-asian="13pt" style:font-size-complex="13pt"/>
    </style:style>
    <style:style style:name="P17" style:family="paragraph" style:parent-style-name="Standard" style:list-style-name="L4">
      <style:text-properties fo:font-size="13pt" officeooo:rsid="004640e7" officeooo:paragraph-rsid="004640e7" style:font-size-asian="13pt" style:font-size-complex="13pt"/>
    </style:style>
    <style:style style:name="P18" style:family="paragraph" style:parent-style-name="Standard" style:list-style-name="L4">
      <style:text-properties fo:font-size="13pt" officeooo:rsid="004640e7" officeooo:paragraph-rsid="0049689c" style:font-size-asian="13pt" style:font-size-complex="13pt"/>
    </style:style>
    <style:style style:name="P19" style:family="paragraph" style:parent-style-name="Standard" style:list-style-name="L5">
      <style:text-properties fo:font-size="13pt" officeooo:rsid="004b2269" officeooo:paragraph-rsid="004b2269" style:font-size-asian="13pt" style:font-size-complex="13pt"/>
    </style:style>
    <style:style style:name="P20" style:family="paragraph" style:parent-style-name="Standard" style:list-style-name="L5">
      <style:text-properties fo:font-size="13pt" officeooo:rsid="004bd4dc" officeooo:paragraph-rsid="004bd4dc" style:font-size-asian="13pt" style:font-size-complex="13pt"/>
    </style:style>
    <style:style style:name="P21" style:family="paragraph" style:parent-style-name="Standard">
      <style:paragraph-properties fo:text-align="center" style:justify-single-word="false"/>
      <style:text-properties fo:font-size="13pt" officeooo:rsid="0041b891" officeooo:paragraph-rsid="0041b891" style:font-size-asian="13pt" style:font-size-complex="13pt"/>
    </style:style>
    <style:style style:name="P22" style:family="paragraph" style:parent-style-name="Standard" style:list-style-name="L3">
      <style:text-properties fo:font-size="13pt" style:text-underline-style="none" officeooo:rsid="005baef1" officeooo:paragraph-rsid="005a0de8" style:font-size-asian="13pt" style:font-size-complex="13pt"/>
    </style:style>
    <style:style style:name="P23" style:family="paragraph" style:parent-style-name="Standard" style:list-style-name="L3">
      <style:text-properties fo:font-size="13pt" style:text-underline-style="none" officeooo:rsid="00219ae6" officeooo:paragraph-rsid="00219ae6" style:font-size-asian="13pt" style:font-size-complex="13pt"/>
    </style:style>
    <style:style style:name="P24" style:family="paragraph" style:parent-style-name="Standard" style:list-style-name="L1">
      <style:text-properties fo:font-size="13pt" style:text-underline-style="none" officeooo:rsid="0025d374" officeooo:paragraph-rsid="0025d374" style:font-size-asian="13pt" style:font-size-complex="13pt"/>
    </style:style>
    <style:style style:name="P25" style:family="paragraph" style:parent-style-name="Standard" style:list-style-name="L1">
      <style:text-properties officeooo:paragraph-rsid="0022cf15"/>
    </style:style>
    <style:style style:name="P26" style:family="paragraph" style:parent-style-name="Standard" style:list-style-name="L2">
      <style:text-properties officeooo:paragraph-rsid="00423ce4"/>
    </style:style>
    <style:style style:name="P27" style:family="paragraph" style:parent-style-name="Standard" style:list-style-name="L4">
      <style:text-properties officeooo:paragraph-rsid="0044802c"/>
    </style:style>
    <style:style style:name="P28" style:family="paragraph" style:parent-style-name="Standard" style:list-style-name="L4">
      <style:text-properties officeooo:paragraph-rsid="004a6241"/>
    </style:style>
    <style:style style:name="P29" style:family="paragraph" style:parent-style-name="Standard" style:list-style-name="L5">
      <style:text-properties officeooo:paragraph-rsid="004e2168"/>
    </style:style>
    <style:style style:name="P30" style:family="paragraph" style:parent-style-name="Standard" style:list-style-name="L5">
      <style:text-properties officeooo:paragraph-rsid="00662956"/>
    </style:style>
    <style:style style:name="P31" style:family="paragraph" style:parent-style-name="Standard">
      <style:text-properties officeooo:paragraph-rsid="00662956"/>
    </style:style>
    <style:style style:name="P32" style:family="paragraph" style:parent-style-name="Table_20_Contents" style:list-style-name="L1">
      <style:text-properties fo:font-size="13pt" officeooo:rsid="003c2f1f" officeooo:paragraph-rsid="003c2f1f" style:font-size-asian="13pt" style:font-size-complex="13pt"/>
    </style:style>
    <style:style style:name="P33" style:family="paragraph" style:parent-style-name="Table_20_Contents" style:list-style-name="L2">
      <style:text-properties fo:font-size="13pt" officeooo:rsid="003c2f1f" officeooo:paragraph-rsid="003c2f1f" style:font-size-asian="13pt" style:font-size-complex="13pt"/>
    </style:style>
    <style:style style:name="P34" style:family="paragraph" style:parent-style-name="Table_20_Contents" style:list-style-name="L1">
      <style:text-properties fo:font-size="13pt" officeooo:rsid="003d3bad" officeooo:paragraph-rsid="003d3bad" style:font-size-asian="13pt" style:font-size-complex="13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44802c"/>
    </style:style>
    <style:style style:name="T3" style:family="text">
      <style:text-properties style:text-underline-style="solid" style:text-underline-width="auto" style:text-underline-color="font-color" officeooo:rsid="0043cd47"/>
    </style:style>
    <style:style style:name="T4" style:family="text">
      <style:text-properties style:text-underline-style="solid" style:text-underline-width="auto" style:text-underline-color="font-color" officeooo:rsid="004b2269"/>
    </style:style>
    <style:style style:name="T5" style:family="text">
      <style:text-properties style:text-underline-style="none"/>
    </style:style>
    <style:style style:name="T6" style:family="text">
      <style:text-properties style:text-underline-style="none" officeooo:rsid="004a6241"/>
    </style:style>
    <style:style style:name="T7" style:family="text">
      <style:text-properties style:text-underline-style="none" officeooo:rsid="005dac9f"/>
    </style:style>
    <style:style style:name="T8" style:family="text">
      <style:text-properties officeooo:rsid="001ce621"/>
    </style:style>
    <style:style style:name="T9" style:family="text">
      <style:text-properties officeooo:rsid="0026774e"/>
    </style:style>
    <style:style style:name="T10" style:family="text">
      <style:text-properties officeooo:rsid="002c0d35"/>
    </style:style>
    <style:style style:name="T11" style:family="text">
      <style:text-properties officeooo:rsid="002d4d49"/>
    </style:style>
    <style:style style:name="T12" style:family="text">
      <style:text-properties officeooo:rsid="00326d2a"/>
    </style:style>
    <style:style style:name="T13" style:family="text">
      <style:text-properties fo:font-size="13pt" style:font-size-asian="13pt" style:font-size-complex="13pt"/>
    </style:style>
    <style:style style:name="T14" style:family="text">
      <style:text-properties fo:font-size="13pt" officeooo:rsid="00219ae6" style:font-size-asian="13pt" style:font-size-complex="13pt"/>
    </style:style>
    <style:style style:name="T15" style:family="text">
      <style:text-properties fo:font-size="13pt" officeooo:rsid="002887f1" style:font-size-asian="13pt" style:font-size-complex="13pt"/>
    </style:style>
    <style:style style:name="T16" style:family="text">
      <style:text-properties fo:font-size="13pt" officeooo:rsid="00423ce4" style:font-size-asian="13pt" style:font-size-complex="13pt"/>
    </style:style>
    <style:style style:name="T17" style:family="text">
      <style:text-properties fo:font-size="13pt" officeooo:rsid="0043cd47" style:font-size-asian="13pt" style:font-size-complex="13pt"/>
    </style:style>
    <style:style style:name="T18" style:family="text">
      <style:text-properties fo:font-size="13pt" officeooo:rsid="0049689c" style:font-size-asian="13pt" style:font-size-complex="13pt"/>
    </style:style>
    <style:style style:name="T19" style:family="text">
      <style:text-properties fo:font-size="13pt" officeooo:rsid="0044802c" style:font-size-asian="13pt" style:font-size-complex="13pt"/>
    </style:style>
    <style:style style:name="T20" style:family="text">
      <style:text-properties fo:font-size="13pt" officeooo:rsid="0047be45" style:font-size-asian="13pt" style:font-size-complex="13pt"/>
    </style:style>
    <style:style style:name="T21" style:family="text">
      <style:text-properties fo:font-size="13pt" officeooo:rsid="004640e7" style:font-size-asian="13pt" style:font-size-complex="13pt"/>
    </style:style>
    <style:style style:name="T22" style:family="text">
      <style:text-properties fo:font-size="13pt" officeooo:rsid="004a6241" style:font-size-asian="13pt" style:font-size-complex="13pt"/>
    </style:style>
    <style:style style:name="T23" style:family="text">
      <style:text-properties fo:font-size="13pt" officeooo:rsid="004e2168" style:font-size-asian="13pt" style:font-size-complex="13pt"/>
    </style:style>
    <style:style style:name="T24" style:family="text">
      <style:text-properties fo:font-size="13pt" officeooo:rsid="004e74fc" style:font-size-asian="13pt" style:font-size-complex="13pt"/>
    </style:style>
    <style:style style:name="T25" style:family="text">
      <style:text-properties fo:font-size="13pt" officeooo:rsid="004fcb49" style:font-size-asian="13pt" style:font-size-complex="13pt"/>
    </style:style>
    <style:style style:name="T26" style:family="text">
      <style:text-properties fo:font-size="13pt" officeooo:rsid="00543776" style:font-size-asian="13pt" style:font-size-complex="13pt"/>
    </style:style>
    <style:style style:name="T27" style:family="text">
      <style:text-properties fo:font-size="13pt" officeooo:rsid="00555383" style:font-size-asian="13pt" style:font-size-complex="13pt"/>
    </style:style>
    <style:style style:name="T28" style:family="text">
      <style:text-properties fo:font-size="13pt" officeooo:rsid="0057bee4" style:font-size-asian="13pt" style:font-size-complex="13pt"/>
    </style:style>
    <style:style style:name="T29" style:family="text">
      <style:text-properties fo:font-size="13pt" officeooo:rsid="00591f10" style:font-size-asian="13pt" style:font-size-complex="13pt"/>
    </style:style>
    <style:style style:name="T30" style:family="text">
      <style:text-properties fo:font-size="13pt" fo:background-color="transparent" loext:char-shading-value="0" style:font-size-asian="13pt" style:font-size-complex="13pt"/>
    </style:style>
    <style:style style:name="T31" style:family="text">
      <style:text-properties fo:font-size="13pt" fo:font-weight="bold" style:font-size-asian="13pt" style:font-weight-asian="bold" style:font-size-complex="13pt" style:font-weight-complex="bold"/>
    </style:style>
    <style:style style:name="T32" style:family="text">
      <style:text-properties fo:font-size="13pt" fo:background-color="#fff5ce" loext:char-shading-value="0" style:font-size-asian="13pt" style:font-size-complex="13pt"/>
    </style:style>
    <style:style style:name="T33" style:family="text">
      <style:text-properties fo:font-size="13pt" style:text-underline-style="none" officeooo:rsid="0022cf15" style:font-size-asian="13pt" style:font-size-complex="13pt"/>
    </style:style>
    <style:style style:name="T34" style:family="text">
      <style:text-properties fo:font-size="13pt" style:text-underline-style="none" officeooo:rsid="0026a692" style:font-size-asian="13pt" style:font-size-complex="13pt"/>
    </style:style>
    <style:style style:name="T35" style:family="text">
      <style:text-properties fo:font-size="13pt" style:text-underline-style="none" officeooo:rsid="0024681a" style:font-size-asian="13pt" style:font-size-complex="13pt"/>
    </style:style>
    <style:style style:name="T36" style:family="text">
      <style:text-properties fo:font-size="13pt" style:text-underline-style="none" officeooo:rsid="00239b4d" style:font-size-asian="13pt" style:font-size-complex="13pt"/>
    </style:style>
    <style:style style:name="T37" style:family="text">
      <style:text-properties fo:font-size="13pt" style:text-underline-style="none" officeooo:rsid="002cd9ad" style:font-size-asian="13pt" style:font-size-complex="13pt"/>
    </style:style>
    <style:style style:name="T38" style:family="text">
      <style:text-properties fo:font-size="13pt" style:text-underline-style="none" officeooo:rsid="006212a5" style:font-size-asian="13pt" style:font-size-complex="13pt"/>
    </style:style>
    <style:style style:name="T39" style:family="text">
      <style:text-properties fo:font-size="13pt" style:text-underline-style="solid" style:text-underline-width="auto" style:text-underline-color="font-color" officeooo:rsid="00543776" style:font-size-asian="13pt" style:font-size-complex="13pt"/>
    </style:style>
    <style:style style:name="T40" style:family="text">
      <style:text-properties fo:font-size="13pt" fo:background-color="#ffe994" loext:char-shading-value="0" style:font-size-asian="13pt" style:font-size-complex="13pt"/>
    </style:style>
    <style:style style:name="T41" style:family="text">
      <style:text-properties fo:color="#127622" loext:opacity="100%" fo:font-size="13pt" style:font-size-asian="13pt" style:font-size-complex="13pt"/>
    </style:style>
    <style:style style:name="T42" style:family="text">
      <style:text-properties fo:color="#127622" loext:opacity="100%" fo:font-size="13pt" style:text-underline-style="none" officeooo:rsid="006212a5" style:font-size-asian="13pt" style:font-size-complex="13pt"/>
    </style:style>
    <style:style style:name="T43" style:family="text">
      <style:text-properties fo:color="#127622" loext:opacity="100%" style:text-position="0% 100%" fo:font-size="13pt" style:text-underline-style="none" officeooo:rsid="00662956" style:font-size-asian="13pt" style:font-size-complex="13pt"/>
    </style:style>
    <style:style style:name="T44" style:family="text">
      <style:text-properties fo:color="#127622" loext:opacity="100%" style:text-position="0% 100%" fo:font-size="12pt" style:text-underline-style="none" officeooo:rsid="00662956" style:font-size-asian="12pt" style:font-size-complex="12pt"/>
    </style:style>
    <style:style style:name="T45" style:family="text">
      <style:text-properties officeooo:rsid="00421165"/>
    </style:style>
    <style:style style:name="T46" style:family="text">
      <style:text-properties officeooo:rsid="0043cd47"/>
    </style:style>
    <style:style style:name="T47" style:family="text">
      <style:text-properties officeooo:rsid="0044802c"/>
    </style:style>
    <style:style style:name="T48" style:family="text">
      <style:text-properties officeooo:rsid="0047be45"/>
    </style:style>
    <style:style style:name="T49" style:family="text">
      <style:text-properties officeooo:rsid="0049689c"/>
    </style:style>
    <style:style style:name="T50" style:family="text">
      <style:text-properties officeooo:rsid="004b2269"/>
    </style:style>
    <style:style style:name="T51" style:family="text">
      <style:text-properties officeooo:rsid="004c3c9b"/>
    </style:style>
    <style:style style:name="T52" style:family="text">
      <style:text-properties officeooo:rsid="004e2168"/>
    </style:style>
    <style:style style:name="T53" style:family="text">
      <style:text-properties officeooo:rsid="004fd8bd"/>
    </style:style>
    <style:style style:name="T54" style:family="text">
      <style:text-properties officeooo:rsid="005b702a"/>
    </style:style>
    <style:style style:name="T55" style:family="text">
      <style:text-properties officeooo:rsid="005e3d10"/>
    </style:style>
    <style:style style:name="T56" style:family="text">
      <style:text-properties officeooo:rsid="006189b9"/>
    </style:style>
    <style:style style:name="T57" style:family="text">
      <style:text-properties style:text-position="super 58%" style:text-underline-style="none" officeooo:rsid="00662956"/>
    </style:style>
    <style:style style:name="T58" style:family="text">
      <style:text-properties style:text-position="super 58%" fo:font-size="13pt" style:text-underline-style="none" officeooo:rsid="00662956" style:font-size-asian="13pt" style:font-size-complex="13pt"/>
    </style:style>
    <style:style style:name="T59" style:family="text">
      <style:text-properties style:text-position="0% 100%" style:text-underline-style="none" officeooo:rsid="00662956"/>
    </style:style>
    <style:style style:name="T60" style:family="text">
      <style:text-properties style:text-position="0% 100%" fo:font-size="13pt" style:text-underline-style="none" officeooo:rsid="00662956" style:font-size-asian="13pt" style:font-size-complex="13pt"/>
    </style:style>
    <style:style style:name="T61" style:family="text">
      <style:text-properties style:text-position="0% 100%" fo:font-size="13pt" style:text-underline-style="solid" style:text-underline-width="auto" style:text-underline-color="font-color" officeooo:rsid="00662956" style:font-size-asian="13pt" style:font-size-complex="13pt"/>
    </style:style>
    <style:style style:name="T62" style:family="text">
      <style:text-properties style:text-position="0% 100%" fo:font-size="12pt" style:text-underline-style="none" officeooo:rsid="00662956" style:font-size-asian="12pt" style:font-size-complex="12pt"/>
    </style:style>
    <style:style style:name="T63" style:family="text">
      <style:text-properties style:text-position="0% 100%" fo:font-size="12pt" style:text-underline-style="solid" style:text-underline-width="auto" style:text-underline-color="font-color" officeooo:rsid="00662956" style:font-size-asian="12pt" style:font-size-complex="12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hessalonians 2:13</text:p>
      <text:p text:style-name="P3">But we are bound to give thanks alway to God for you, brethren beloved of the Lord, because God hath from the beginning chosen you to salvation through sanctification of the Spirit and belief of the truth:</text:p>
      <text:p text:style-name="P3"/>
      <text:list text:style-name="L3">
        <text:list-item>
          <text:p text:style-name="P14">Verse 13 begins with “but” and that tells us that what follows it and what precedes <text:span text:style-name="T8">it</text:span> are connected.</text:p>
        </text:list-item>
        <text:list-item>
          <text:p text:style-name="P15"><text:span text:style-name="T5">In English grammar, “but” is </text:span><text:span text:style-name="T7">called</text:span><text:span text:style-name="T5"> a “coordinating conjunction”. That’s a fancy way of saying that it is a word that connects two or more words, phrases (incomplete sentences), or clauses (complete sentences).</text:span></text:p>
        </text:list-item>
        <text:list-item>
          <text:p text:style-name="P22">Other examples of coordinating conjunctions are: for, and, nor, or, yet, so.</text:p>
        </text:list-item>
        <text:list-item>
          <text:p text:style-name="P23">So, lets have a look at what comes before verses 13 and 14 (which are one sentence) <text:span text:style-name="T10">so we can </text:span><text:span text:style-name="T54">identify what comes before and after </text:span><text:span text:style-name="T56">the </text:span><text:span text:style-name="T54">“</text:span><text:span text:style-name="T55">but”.</text:span></text:p>
        </text:list-item>
      </text:list>
      <text:p text:style-name="P11"/>
      <table:table table:name="Table2" table:style-name="Table2">
        <table:table-column table:style-name="Table2.A"/>
        <table:table-row>
          <table:table-cell table:style-name="Table2.A1" office:value-type="string">
            <text:p text:style-name="P2">2 Thessalonians 2:1-1<text:span text:style-name="T12">4</text:span></text:p>
            <text:p text:style-name="P12"><text:span text:style-name="T14">[</text:span><text:span text:style-name="T41">1</text:span><text:span text:style-name="T14">] </text:span><text:span text:style-name="T13">Now we beseech you, brethren, by the coming of our Lord Jesus Christ, and by our gathering together unto him,</text:span></text:p>
            <text:p text:style-name="P12"><text:span text:style-name="T13">[</text:span><text:span text:style-name="T41">2</text:span><text:span text:style-name="T13">] That ye be not soon shaken in mind, or be troubled, neither by spirit, nor by word, nor by letter as from us, as that the day of Christ is at hand.</text:span></text:p>
            <text:p text:style-name="P12"><text:span text:style-name="T13">[</text:span><text:span text:style-name="T41">3</text:span><text:span text:style-name="T13">] Let no man deceive you by any means: for that day shall not come, except there come a falling away first, and th</text:span><text:span text:style-name="T30">at man of sin be revealed, the son of perdition;</text:span></text:p>
            <text:p text:style-name="P12"><text:span text:style-name="T13">[</text:span><text:span text:style-name="T41">4</text:span><text:span text:style-name="T13">] Who opposeth and exalteth himself above all that is called God, or that is worshipped; so that he as God sitteth in the temple of God, shewing himself that he is God.</text:span></text:p>
            <text:p text:style-name="P12"><text:span text:style-name="T13">[</text:span><text:span text:style-name="T41">5</text:span><text:span text:style-name="T13">] Remember ye not, that, when I was yet with you, I told you these things?</text:span></text:p>
            <text:p text:style-name="P12"><text:span text:style-name="T14">[</text:span><text:span text:style-name="T41">6</text:span><text:span text:style-name="T13">] And now ye know what withholdeth that he might be revealed in his time.</text:span></text:p>
            <text:p text:style-name="P12"><text:span text:style-name="T13">[</text:span><text:span text:style-name="T41">7</text:span><text:span text:style-name="T13">] For the mystery of iniquity doth already work: only he who now letteth will let, until he be taken out of the way.</text:span></text:p>
            <text:p text:style-name="P12"><text:span text:style-name="T13">[</text:span><text:span text:style-name="T41">8</text:span><text:span text:style-name="T13">] </text:span><text:span text:style-name="T40">And then shall that Wicked be revealed, whom the Lord shall consume with the spirit of his mouth, and shall destroy with the brightness of his coming:</text:span></text:p>
            <text:p text:style-name="P12"><text:span text:style-name="T13">[</text:span><text:span text:style-name="T41">9</text:span><text:span text:style-name="T13">] </text:span><text:span text:style-name="T40">Even him, whose coming is after the working of Satan with all power and signs and lying wonders,</text:span></text:p>
            <text:p text:style-name="P12"><text:span text:style-name="T13">[</text:span><text:span text:style-name="T41">10</text:span><text:span text:style-name="T13">] </text:span><text:span text:style-name="T40">And with all deceivableness of unrighteousness in them that perish; because they received not the love of the truth, that they might be saved.</text:span></text:p>
            <text:p text:style-name="P12"><text:span text:style-name="T13">[</text:span><text:span text:style-name="T41">11</text:span><text:span text:style-name="T13">] </text:span><text:span text:style-name="T40">And for this cause God shall send them strong delusion, that they should believe a lie:</text:span></text:p>
            <text:p text:style-name="P12"><text:span text:style-name="T13">[</text:span><text:span text:style-name="T41">12</text:span><text:span text:style-name="T13">] </text:span><text:span text:style-name="T40">That they all might be damned who believed not the truth, but had pleasure in unrighteousness.</text:span></text:p>
            <text:p text:style-name="P13"><text:span text:style-name="T15">[</text:span><text:span text:style-name="T41">13</text:span><text:span text:style-name="T15">] </text:span><text:span text:style-name="T31">But</text:span><text:span text:style-name="T13"> </text:span><text:span text:style-name="T32">we are bound to give thanks alway to God for you, brethren beloved of the Lord, because God hath from the beginning chosen you to salvation through sanctification of the Spirit and belief of the truth:</text:span></text:p>
            <text:p text:style-name="P13"><text:span text:style-name="T13">[</text:span><text:span text:style-name="T41">14</text:span><text:span text:style-name="T13">] </text:span><text:span text:style-name="T32">Whereunto he called you by our gospel, to the obtaining of the glory of our Lord Jesus Christ.</text:span></text:p>
          </table:table-cell>
        </table:table-row>
      </table:table>
      <text:p text:style-name="P11"/>
      <text:list text:style-name="L1">
        <text:list-item>
          <text:p text:style-name="P25"><text:span text:style-name="T33">This portion of the epistle from Paul </text:span><text:span text:style-name="T34">(</text:span><text:span text:style-name="T41">II Thess. 3:17</text:span><text:span text:style-name="T34">) </text:span><text:span text:style-name="T33">to the church at Thessalonica</text:span><text:span text:style-name="T35"> addresses</text:span><text:span text:style-name="T33"> <text:s/></text:span><text:span text:style-name="T35">c</text:span><text:span text:style-name="T33">oncerns of that church with regards to the “</text:span><text:span text:style-name="T36">day of Christ”</text:span><text:span text:style-name="T37"> </text:span><text:span text:style-name="T34">also known as</text:span><text:span text:style-name="T36"> the second coming of our Lord Jesus Christ </text:span><text:span text:style-name="T38">(</text:span><text:span text:style-name="T42">I Thess. 4:15-18</text:span><text:span text:style-name="T38">)</text:span></text:p>
        </text:list-item>
        <text:list-item>
          <text:p text:style-name="P24">What follows is a list of things that will happen before the return of Christ which reveals <text:span text:style-name="T9">to </text:span>both the church at Thessalonica and to us more details about the <text:span text:style-name="T11">events leading up to His return.</text:span></text:p>
        </text:list-item>
      </text:list>
      <text:p text:style-name="P5"/>
      <text:p text:style-name="P5"/>
      <text:p text:style-name="P5"><text:soft-page-break/>Nouns/<text:span text:style-name="T45">subjects</text:span> before and after “but”</text:p>
      <table:table table:name="Table3" table:style-name="Table3">
        <table:table-column table:style-name="Table3.A"/>
        <table:table-column table:style-name="Table3.B"/>
        <table:table-column table:style-name="Table3.C"/>
        <table:table-row>
          <table:table-cell table:style-name="Table3.A1" office:value-type="string">
            <text:p text:style-name="P10">Verses 8-12</text:p>
          </table:table-cell>
          <table:table-cell table:style-name="Table3.B1" office:value-type="string">
            <text:p text:style-name="P9"/>
          </table:table-cell>
          <table:table-cell table:style-name="Table3.C1" office:value-type="string">
            <text:p text:style-name="P10">Verses 13,14</text:p>
          </table:table-cell>
        </table:table-row>
        <table:table-row>
          <table:table-cell table:style-name="Table3.A2" office:value-type="string">
            <text:list text:continue-numbering="true" text:style-name="L1">
              <text:list-item>
                <text:p text:style-name="P32">That man of sin</text:p>
              </text:list-item>
              <text:list-item>
                <text:p text:style-name="P32">the son of perdition</text:p>
              </text:list-item>
              <text:list-item>
                <text:p text:style-name="P32">that Wicked</text:p>
              </text:list-item>
              <text:list-item>
                <text:p text:style-name="P32">Satan</text:p>
              </text:list-item>
              <text:list-item>
                <text:p text:style-name="P32">them that perish</text:p>
              </text:list-item>
              <text:list-item>
                <text:p text:style-name="P34">(not) saved</text:p>
              </text:list-item>
              <text:list-item>
                <text:p text:style-name="P34">damned (condemned)</text:p>
              </text:list-item>
              <text:list-item>
                <text:p text:style-name="P34">believed not the truth</text:p>
              </text:list-item>
              <text:list-item>
                <text:p text:style-name="P34">had pleasure in unrighteousness</text:p>
              </text:list-item>
            </text:list>
          </table:table-cell>
          <table:table-cell table:style-name="Table3.B2" office:value-type="string">
            <text:p text:style-name="P9">but</text:p>
          </table:table-cell>
          <table:table-cell table:style-name="Table3.C2" office:value-type="string">
            <text:list text:style-name="L2">
              <text:list-item>
                <text:p text:style-name="P33">God</text:p>
              </text:list-item>
              <text:list-item>
                <text:p text:style-name="P33">Brethren beloved of the Lord</text:p>
              </text:list-item>
              <text:list-item>
                <text:p text:style-name="P33">(heirs of) salvation</text:p>
              </text:list-item>
              <text:list-item>
                <text:p text:style-name="P33">(the) called</text:p>
              </text:list-item>
              <text:list-item>
                <text:p text:style-name="P33">(heirs of) the glory of our Lord Jesus Christ</text:p>
              </text:list-item>
            </text:list>
          </table:table-cell>
        </table:table-row>
      </table:table>
      <text:p text:style-name="P4"/>
      <text:list text:continue-numbering="true" text:style-name="L2">
        <text:list-item>
          <text:p text:style-name="P26"><text:span text:style-name="T16">Note that nothing in particular is said about the evil things </text:span><text:span text:style-name="T17">except that they exist and </text:span><text:span text:style-name="T18">some of them </text:span><text:span text:style-name="T17">will be revealed at a later time </text:span><text:span text:style-name="T16">(</text:span><text:span text:style-name="T41">Exodus 22:28a</text:span><text:span text:style-name="T16">, </text:span><text:span text:style-name="T41">Ephesians 5:11,12</text:span><text:span text:style-name="T16">).</text:span></text:p>
        </text:list-item>
      </text:list>
      <text:p text:style-name="P6"/>
      <text:list text:continue-numbering="true" text:style-name="L2">
        <text:list-item>
          <text:p text:style-name="P16"><text:span text:style-name="T5">“</text:span><text:span text:style-name="T6">But </text:span><text:span text:style-name="T1">we</text:span><text:span text:style-name="T57">1</text:span> are bound to give thanks” … “<text:span text:style-name="T3">to</text:span><text:span text:style-name="T46"> God </text:span><text:span text:style-name="T50">for </text:span><text:span text:style-name="T4">you</text:span><text:span text:style-name="T46">” … “</text:span><text:span text:style-name="T2">because</text:span><text:span text:style-name="T47">”</text:span></text:p>
        </text:list-item>
      </text:list>
      <text:list text:style-name="L4">
        <text:list-item>
          <text:p text:style-name="P27"><text:span text:style-name="T19">“God hath from the beginning chosen you to salvation” </text:span><text:span text:style-name="T20">(</text:span><text:span text:style-name="T41">Ephesians 1:4-5</text:span><text:span text:style-name="T21">, </text:span><text:span text:style-name="T41">2 Timothy 1:9</text:span><text:span text:style-name="T21">, </text:span><text:span text:style-name="T41">1 Peter 1:2</text:span><text:span text:style-name="T20">)</text:span></text:p>
          <text:list>
            <text:list-item>
              <text:p text:style-name="P17">“<text:span text:style-name="T1">through</text:span>” <text:span text:style-name="T48">(the means, the method)</text:span></text:p>
              <text:list>
                <text:list-item>
                  <text:p text:style-name="P18">sanctification (the act of making holy, the act of consecrating or of setting apart for a sacred purpose)</text:p>
                </text:list-item>
                <text:list-item>
                  <text:p text:style-name="P18">of the <text:span text:style-name="T1">S</text:span>pirit <text:span text:style-name="T49">(God’s spirit)</text:span></text:p>
                </text:list-item>
              </text:list>
            </text:list-item>
            <text:list-item>
              <text:p text:style-name="P28"><text:span text:style-name="T22">and belief of the truth (believing the gospel which saves)(</text:span><text:span text:style-name="T41">Romans 10:10</text:span><text:span text:style-name="T22">)</text:span></text:p>
            </text:list-item>
          </text:list>
        </text:list-item>
      </text:list>
      <text:p text:style-name="P7"/>
      <text:list text:style-name="L5">
        <text:list-item>
          <text:p text:style-name="P19">When you look at an unsaved person do you feel the need to thank God that they aren’t saved or do you instead rather feel you should pray that God would save them?</text:p>
        </text:list-item>
        <text:list-item>
          <text:p text:style-name="P19">When you look at a person that you know is saved does it feel appropriate to thank God for saving that person’s soul?</text:p>
        </text:list-item>
        <text:list-item>
          <text:p text:style-name="P20">Likewise, in verse 13, Paul is expressing this never-ending thanks we can give to God not only for saving us but for anyone else. <text:span text:style-name="T51">Once we are saved and learn the truth we realize that </text:span><text:span text:style-name="T53">salvation is of God</text:span><text:span text:style-name="T51">, He will finish what He started, and we are secure </text:span><text:span text:style-name="T53">forever</text:span><text:span text:style-name="T51">. A natural </text:span><text:span text:style-name="T52">next step</text:span><text:span text:style-name="T51"> after realizing that is – what about everyone else?</text:span></text:p>
        </text:list-item>
        <text:list-item>
          <text:p text:style-name="P29"><text:span text:style-name="T23">Now, put yourself in Paul’s shoes. He traveled widely preaching the gospel and was an instrument used by God to establish quite a few of the early christian churches. His letters </text:span><text:span text:style-name="T24">reveal </text:span><text:span text:style-name="T23">that he cared deeply about the spiritual growth </text:span><text:span text:style-name="T24">of the churches. </text:span><text:span text:style-name="T25">Watching first hand, hearing about from others, and receiving letters from those churches was a bag of mixed emotions for Paul but the constant throughout his epistles is that he cared deeply about </text:span><text:span text:style-name="T28">others</text:span><text:span text:style-name="T25">. Seeing and hearing about people getting saved as a result of Paul preaching the gospel throughout the region was certainly a great joy for him (</text:span><text:span text:style-name="T41">Phil. 4:1</text:span><text:span text:style-name="T25">).</text:span></text:p>
        </text:list-item>
      </text:list>
      <text:p text:style-name="P8"/>
      <text:list text:continue-numbering="true" text:style-name="L5">
        <text:list-item>
          <text:p text:style-name="P30"><text:span text:style-name="T26">It is in the context of that joy that Paul pens </text:span><text:span text:style-name="T41">II Thessalonians 2:13</text:span><text:span text:style-name="T26"> of which </text:span><text:span text:style-name="T39">we</text:span><text:span text:style-name="T58">1</text:span><text:span text:style-name="T26"> also can </text:span><text:span text:style-name="T27">join him in</text:span><text:span text:style-name="T26"> thanking God always for providing both the means and the method </text:span><text:span text:style-name="T29">of</text:span><text:span text:style-name="T26"> reconciling </text:span><text:span text:style-name="T29">men with their God.</text:span></text:p>
        </text:list-item>
      </text:list>
      <text:p text:style-name="P31"><text:span text:style-name="T29"/></text:p>
      <text:p text:style-name="P31"><text:span text:style-name="T29"/></text:p>
      <text:p text:style-name="P31"><text:span text:style-name="T29"/></text:p>
      <text:p text:style-name="P31"><text:span text:style-name="T29"/></text:p>
      <text:p text:style-name="P31"><text:span text:style-name="T58">1 </text:span><text:span text:style-name="T44">II Thessalonians 3:17</text:span><text:span text:style-name="T62"> (the end of the epistle) tells us that Paul wrote this letter with his own hand (singular). Who do you think the </text:span><text:span text:style-name="T63">we</text:span><text:span text:style-name="T62"> (plural) is that he referred t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ans"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0T09:58:33.902321933</meta:creation-date>
    <dc:date>2023-12-21T13:28:47.896000000</dc:date>
    <meta:editing-duration>PT4H6M13S</meta:editing-duration>
    <meta:editing-cycles>88</meta:editing-cycles>
    <meta:generator>LibreOffice/7.6.2.1$Windows_X86_64 LibreOffice_project/56f7684011345957bbf33a7ee678afaf4d2ba333</meta:generator>
    <meta:document-statistic meta:table-count="2" meta:image-count="0" meta:object-count="0" meta:page-count="2" meta:paragraph-count="54" meta:word-count="1032" meta:character-count="5492" meta:non-whitespace-character-count="4544"/>
  </office:meta>
</office:document-meta>
</file>