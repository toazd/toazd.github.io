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4*"/>
    </style:style>
    <style:style style:name="Table2.B" style:family="table-column">
      <style:table-column-properties style:column-width="2.6333in" style:rel-column-width="21845*"/>
    </style:style>
    <style:style style:name="Table2.C" style:family="table-column">
      <style:table-column-properties style:column-width="2.6333in" style:rel-column-width="21846*"/>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3.95in" style:rel-column-width="32768*"/>
    </style:style>
    <style:style style:name="Table3.B" style:family="table-column">
      <style:table-column-properties style:column-width="3.9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left="none" fo:border-right="0.5pt solid #000000" fo:border-top="0.5pt solid #000000" fo:border-bottom="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none" fo:border-right="0.5pt solid #000000" fo:border-top="none" fo:border-bottom="0.5pt solid #000000"/>
    </style:style>
    <style:style style:name="Table4" style:family="table">
      <style:table-properties style:width="7.9in" fo:break-before="page" table:align="margins"/>
    </style:style>
    <style:style style:name="Table4.A" style:family="table-column">
      <style:table-column-properties style:column-width="3.95in" style:rel-column-width="32767*"/>
    </style:style>
    <style:style style:name="Table4.B" style:family="table-column">
      <style:table-column-properties style:column-width="3.9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officeooo:paragraph-rsid="003713d7" style:font-size-asian="13pt" style:font-size-complex="13pt"/>
    </style:style>
    <style:style style:name="P3" style:family="paragraph" style:parent-style-name="Standard">
      <style:text-properties fo:font-size="13pt" officeooo:rsid="00268528" style:font-size-asian="13pt" style:font-size-complex="13pt"/>
    </style:style>
    <style:style style:name="P4" style:family="paragraph" style:parent-style-name="Standard">
      <style:paragraph-properties fo:text-align="center" style:justify-single-word="false"/>
      <style:text-properties fo:font-size="13pt" officeooo:rsid="000f86d3" officeooo:paragraph-rsid="000f86d3" style:font-size-asian="13pt" style:font-size-complex="13pt"/>
    </style:style>
    <style:style style:name="P5" style:family="paragraph" style:parent-style-name="Table_20_Contents">
      <style:text-properties fo:color="#127622" loext:opacity="100%" fo:font-size="13pt" style:font-size-asian="13pt" style:font-size-complex="13pt"/>
    </style:style>
    <style:style style:name="P6" style:family="paragraph" style:parent-style-name="Table_20_Contents">
      <style:text-properties style:use-window-font-color="true" loext:opacity="0%" fo:font-size="13pt" style:font-size-asian="13pt" style:font-size-complex="13pt"/>
    </style:style>
    <style:style style:name="P7" style:family="paragraph" style:parent-style-name="Table_20_Contents">
      <style:text-properties fo:font-size="13pt" style:font-size-asian="13pt" style:font-size-complex="13pt"/>
    </style:style>
    <style:style style:name="P8" style:family="paragraph" style:parent-style-name="Standard">
      <style:text-properties fo:font-size="13pt" style:font-size-asian="13pt" style:font-size-complex="13pt"/>
    </style:style>
    <style:style style:name="P9" style:family="paragraph" style:parent-style-name="Standard">
      <style:paragraph-properties fo:text-align="center" style:justify-single-word="false"/>
      <style:text-properties fo:font-size="13pt" officeooo:rsid="001382d0" officeooo:paragraph-rsid="001382d0" style:font-size-asian="13pt" style:font-size-complex="13pt"/>
    </style:style>
    <style:style style:name="P10" style:family="paragraph" style:parent-style-name="Standard">
      <style:text-properties fo:font-size="13pt" officeooo:rsid="0011d854" officeooo:paragraph-rsid="0011d854" style:font-size-asian="13pt" style:font-size-complex="13pt"/>
    </style:style>
    <style:style style:name="P11" style:family="paragraph" style:parent-style-name="Standard">
      <style:text-properties fo:color="#127622" loext:opacity="100%" fo:font-size="13pt" officeooo:paragraph-rsid="0010c766" style:font-size-asian="13pt" style:font-size-complex="13pt"/>
    </style:style>
    <style:style style:name="P12" style:family="paragraph" style:parent-style-name="Table_20_Contents">
      <style:text-properties fo:color="#127622" loext:opacity="100%" fo:font-size="13pt" officeooo:paragraph-rsid="0010c766" style:font-size-asian="13pt" style:font-size-complex="13pt"/>
    </style:style>
    <style:style style:name="P13" style:family="paragraph" style:parent-style-name="Table_20_Contents">
      <style:text-properties fo:font-size="13pt" officeooo:rsid="0011d854" officeooo:paragraph-rsid="0011d854" style:font-size-asian="13pt" style:font-size-complex="13pt"/>
    </style:style>
    <style:style style:name="P14" style:family="paragraph" style:parent-style-name="Standard">
      <style:text-properties fo:font-size="13pt" officeooo:rsid="0010c766" officeooo:paragraph-rsid="0010c766" style:font-size-asian="13pt" style:font-size-complex="13pt"/>
    </style:style>
    <style:style style:name="P15" style:family="paragraph" style:parent-style-name="Standard">
      <style:paragraph-properties fo:text-align="center" style:justify-single-word="false"/>
      <style:text-properties fo:font-size="13pt" officeooo:rsid="00179fe5" officeooo:paragraph-rsid="00179fe5" style:font-size-asian="13pt" style:font-size-complex="13pt"/>
    </style:style>
    <style:style style:name="P16" style:family="paragraph" style:parent-style-name="Standard">
      <style:text-properties fo:font-size="13pt" officeooo:paragraph-rsid="00391ac9" style:font-size-asian="13pt" style:font-size-complex="13pt"/>
    </style:style>
    <style:style style:name="P17" style:family="paragraph" style:parent-style-name="Standard" style:list-style-name="L1">
      <style:text-properties fo:font-size="13pt" officeooo:rsid="003ac636" officeooo:paragraph-rsid="003ac636" style:font-size-asian="13pt" style:font-size-complex="13pt"/>
    </style:style>
    <style:style style:name="P18" style:family="paragraph" style:parent-style-name="Standard">
      <style:text-properties fo:font-size="13pt" officeooo:rsid="003ac636" officeooo:paragraph-rsid="003ac636" style:font-size-asian="13pt" style:font-size-complex="13pt"/>
    </style:style>
    <style:style style:name="P19" style:family="paragraph" style:parent-style-name="Standard" style:list-style-name="L2">
      <style:text-properties fo:font-size="13pt" officeooo:rsid="004b98d9" officeooo:paragraph-rsid="004b98d9" style:font-size-asian="13pt" style:font-size-complex="13pt"/>
    </style:style>
    <style:style style:name="P20" style:family="paragraph" style:parent-style-name="Standard" style:list-style-name="L2">
      <style:text-properties fo:font-size="13pt" officeooo:rsid="004f07c4" officeooo:paragraph-rsid="004f07c4" style:font-size-asian="13pt" style:font-size-complex="13pt"/>
    </style:style>
    <style:style style:name="P21" style:family="paragraph" style:parent-style-name="Standard">
      <style:text-properties fo:font-size="13pt" officeooo:rsid="003b8756" officeooo:paragraph-rsid="003b8756" style:font-size-asian="13pt" style:font-size-complex="13pt"/>
    </style:style>
    <style:style style:name="P22" style:family="paragraph" style:parent-style-name="Standard" style:list-style-name="L1">
      <style:text-properties officeooo:paragraph-rsid="003b8756"/>
    </style:style>
    <style:style style:name="P23" style:family="paragraph" style:parent-style-name="Standard" style:list-style-name="L1">
      <style:text-properties officeooo:paragraph-rsid="003fc82d"/>
    </style:style>
    <style:style style:name="P24" style:family="paragraph" style:parent-style-name="Standard" style:list-style-name="L1">
      <style:text-properties officeooo:paragraph-rsid="003fcb3a"/>
    </style:style>
    <style:style style:name="P25" style:family="paragraph" style:parent-style-name="Standard" style:list-style-name="L1">
      <style:text-properties officeooo:paragraph-rsid="003ddd26"/>
    </style:style>
    <style:style style:name="P26" style:family="paragraph" style:parent-style-name="Standard" style:list-style-name="L1">
      <style:text-properties fo:font-size="13pt" officeooo:rsid="003b8756" officeooo:paragraph-rsid="003b8756" style:font-size-asian="13pt" style:font-size-complex="13pt"/>
    </style:style>
    <style:style style:name="P27" style:family="paragraph" style:parent-style-name="Standard">
      <style:text-properties fo:font-size="13pt" officeooo:rsid="0041818e" officeooo:paragraph-rsid="0041818e" style:font-size-asian="13pt" style:font-size-complex="13pt"/>
    </style:style>
    <style:style style:name="P28" style:family="paragraph" style:parent-style-name="Table_20_Contents">
      <style:text-properties fo:font-size="13pt" officeooo:rsid="001d5efa" officeooo:paragraph-rsid="001d5efa" style:font-size-asian="13pt" style:font-size-complex="13pt"/>
    </style:style>
    <style:style style:name="P29" style:family="paragraph" style:parent-style-name="Table_20_Contents">
      <style:text-properties fo:font-size="13pt" officeooo:rsid="001eb5dc" officeooo:paragraph-rsid="001eb5dc" style:font-size-asian="13pt" style:font-size-complex="13pt"/>
    </style:style>
    <style:style style:name="P30" style:family="paragraph" style:parent-style-name="Standard">
      <style:text-properties style:text-position="0% 100%" fo:font-size="13pt" officeooo:rsid="003713d7" officeooo:paragraph-rsid="003713d7" style:font-size-asian="13pt" style:font-size-complex="13pt"/>
    </style:style>
    <style:style style:name="P31" style:family="paragraph" style:parent-style-name="Table_20_Contents">
      <style:text-properties fo:font-size="13pt" officeooo:rsid="0049a94b" officeooo:paragraph-rsid="0049a94b" style:font-size-asian="13pt" style:font-size-complex="13pt"/>
    </style:style>
    <style:style style:name="T1" style:family="text">
      <style:text-properties style:text-position="super 58%" officeooo:rsid="001d5efa"/>
    </style:style>
    <style:style style:name="T2" style:family="text">
      <style:text-properties style:text-position="super 58%" officeooo:rsid="001bcb43"/>
    </style:style>
    <style:style style:name="T3" style:family="text">
      <style:text-properties style:text-position="super 58%" officeooo:rsid="003713d7"/>
    </style:style>
    <style:style style:name="T4" style:family="text">
      <style:text-properties officeooo:rsid="00161635"/>
    </style:style>
    <style:style style:name="T5" style:family="text">
      <style:text-properties officeooo:rsid="001527ae"/>
    </style:style>
    <style:style style:name="T6" style:family="text">
      <style:text-properties fo:font-size="13pt" style:font-size-asian="13pt" style:font-size-complex="13pt"/>
    </style:style>
    <style:style style:name="T7" style:family="text">
      <style:text-properties fo:font-size="13pt" fo:background-color="#ffff00" loext:char-shading-value="0" style:font-size-asian="13pt" style:font-size-complex="13pt"/>
    </style:style>
    <style:style style:name="T8" style:family="text">
      <style:text-properties fo:font-size="13pt" fo:background-color="transparent" loext:char-shading-value="0" style:font-size-asian="13pt" style:font-size-complex="13pt"/>
    </style:style>
    <style:style style:name="T9" style:family="text">
      <style:text-properties fo:color="#127622" loext:opacity="100%" fo:font-size="13pt" style:font-size-asian="13pt" style:font-size-complex="13pt"/>
    </style:style>
    <style:style style:name="T10" style:family="text">
      <style:text-properties fo:font-size="13pt" fo:background-color="#fff5ce" loext:char-shading-value="0" style:font-size-asian="13pt" style:font-size-complex="13pt"/>
    </style:style>
    <style:style style:name="T11" style:family="text">
      <style:text-properties fo:font-size="13pt" fo:background-color="#ffbf00" loext:char-shading-value="0" style:font-size-asian="13pt" style:font-size-complex="13pt"/>
    </style:style>
    <style:style style:name="T12" style:family="text">
      <style:text-properties fo:color="#ff0000" loext:opacity="100%" fo:font-size="13pt" style:font-size-asian="13pt" style:font-size-complex="13pt"/>
    </style:style>
    <style:style style:name="T13" style:family="text">
      <style:text-properties fo:font-size="13pt" officeooo:rsid="00518667" style:font-size-asian="13pt" style:font-size-complex="13pt"/>
    </style:style>
    <style:style style:name="T14" style:family="text">
      <style:text-properties fo:font-size="13pt" officeooo:rsid="003b8756" style:font-size-asian="13pt" style:font-size-complex="13pt"/>
    </style:style>
    <style:style style:name="T15" style:family="text">
      <style:text-properties fo:font-size="13pt" officeooo:rsid="0050884e" style:font-size-asian="13pt" style:font-size-complex="13pt"/>
    </style:style>
    <style:style style:name="T16" style:family="text">
      <style:text-properties fo:font-size="13pt" style:text-underline-style="solid" style:text-underline-width="auto" style:text-underline-color="font-color" officeooo:rsid="003b8756" style:font-size-asian="13pt" style:font-size-complex="13pt"/>
    </style:style>
    <style:style style:name="T17" style:family="text">
      <style:text-properties fo:font-size="13pt" fo:font-style="italic" officeooo:rsid="003b8756" style:font-size-asian="13pt" style:font-style-asian="italic" style:font-size-complex="13pt" style:font-style-complex="italic"/>
    </style:style>
    <style:style style:name="T18" style:family="text">
      <style:text-properties fo:font-size="13pt" officeooo:rsid="003d3bf1" style:font-size-asian="13pt" style:font-size-complex="13pt"/>
    </style:style>
    <style:style style:name="T19" style:family="text">
      <style:text-properties fo:font-size="13pt" officeooo:rsid="003fc82d" style:font-size-asian="13pt" style:font-size-complex="13pt"/>
    </style:style>
    <style:style style:name="T20" style:family="text">
      <style:text-properties fo:font-size="13pt" officeooo:rsid="003ddd26" style:font-size-asian="13pt" style:font-size-complex="13pt"/>
    </style:style>
    <style:style style:name="T21" style:family="text">
      <style:text-properties officeooo:rsid="003e1182"/>
    </style:style>
    <style:style style:name="T22" style:family="text">
      <style:text-properties officeooo:rsid="00521a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Kings 8:27</text:p>
      <text:p text:style-name="P2">But will God<text:span text:style-name="T1">H430</text:span> indeed dwell<text:span text:style-name="T2">H3427</text:span> on the earth? behold, the heaven<text:span text:style-name="T3">H8064</text:span> and heaven<text:span text:style-name="T3">H8064</text:span> of heavens<text:span text:style-name="T3">H8064</text:span> cannot contain thee; how much less this house that I have builded?</text:p>
      <text:p text:style-name="P3"/>
      <text:p text:style-name="P4"><text:span text:style-name="T4">P</text:span>arallel passage<text:span text:style-name="T4">s</text:span></text:p>
      <table:table table:name="Table1" table:style-name="Table1">
        <table:table-column table:style-name="Table1.A"/>
        <table:table-row>
          <table:table-cell table:style-name="Table1.A1" office:value-type="string">
            <text:p text:style-name="P5">2 Chronicles 6:18</text:p>
            <text:p text:style-name="P6">But will God in very deed dwell with men on the earth? behold, heaven and the heaven of heavens cannot contain thee; how much less this house which I have built!</text:p>
          </table:table-cell>
        </table:table-row>
        <table:table-row>
          <table:table-cell table:style-name="Table1.A2" office:value-type="string">
            <text:p text:style-name="P5">2 Chronicles 2:6</text:p>
            <text:p text:style-name="P7">But who is able to build him an house, seeing the heaven and heaven of heavens cannot contain him? who am I then, that I should build him an house, save only to burn sacrifice before him?</text:p>
          </table:table-cell>
        </table:table-row>
      </table:table>
      <text:p text:style-name="P8"/>
      <text:p text:style-name="P9">Parallel accounts <text:span text:style-name="T5">of the same events</text:span></text:p>
      <table:table table:name="Table2" table:style-name="Table2">
        <table:table-column table:style-name="Table2.A"/>
        <table:table-column table:style-name="Table2.B"/>
        <table:table-column table:style-name="Table2.C"/>
        <table:table-row>
          <table:table-cell table:style-name="Table2.A1" office:value-type="string">
            <text:p text:style-name="P10">Solomon blesses the congregation</text:p>
          </table:table-cell>
          <table:table-cell table:style-name="Table2.A1" office:value-type="string">
            <text:p text:style-name="P11">I Kings 8:12-21</text:p>
          </table:table-cell>
          <table:table-cell table:style-name="Table2.C1" office:value-type="string">
            <text:p text:style-name="P12">II Chronicles 6:1-11</text:p>
          </table:table-cell>
        </table:table-row>
        <table:table-row>
          <table:table-cell table:style-name="Table2.A2" office:value-type="string">
            <text:p text:style-name="P13">Solomon's prayer</text:p>
          </table:table-cell>
          <table:table-cell table:style-name="Table2.A2" office:value-type="string">
            <text:p text:style-name="P12">I Kings 8:22-53</text:p>
          </table:table-cell>
          <table:table-cell table:style-name="Table2.C2" office:value-type="string">
            <text:p text:style-name="P12">II Chronicles 6:12-42</text:p>
          </table:table-cell>
        </table:table-row>
      </table:table>
      <text:p text:style-name="P14"/>
      <text:p text:style-name="P15">Cross-references</text:p>
      <table:table table:name="Table3" table:style-name="Table3">
        <table:table-column table:style-name="Table3.A"/>
        <table:table-column table:style-name="Table3.B"/>
        <table:table-row>
          <table:table-cell table:style-name="Table3.A1" office:value-type="string">
            <text:p text:style-name="P5">Acts 7:48-50</text:p>
            <text:p text:style-name="Table_20_Contents"><text:span text:style-name="T6">Howbeit </text:span><text:span text:style-name="T7">the most High dwelleth not in temples made with hands</text:span><text:span text:style-name="T6">;</text:span><text:span text:style-name="T8"> as saith the prophet,</text:span><text:span text:style-name="T6"> [</text:span><text:span text:style-name="T9">49</text:span><text:span text:style-name="T6">] Heaven is my throne, and earth is my footstool: what house will ye build me? saith the Lord: or what is the place of my rest? [</text:span><text:span text:style-name="T9">50</text:span><text:span text:style-name="T6">] Hath not my hand made all these things?</text:span></text:p>
          </table:table-cell>
          <table:table-cell table:style-name="Table3.B1" office:value-type="string">
            <text:p text:style-name="P5">Isaiah 66:1-2</text:p>
            <text:p text:style-name="Table_20_Contents"><text:span text:style-name="T6">Thus saith the LORD, The heaven is my throne, and the earth is my footstool: where is the house that ye build unto me? and where is the place of my rest? [</text:span><text:span text:style-name="T9">2</text:span><text:span text:style-name="T6">] For all those things hath mine hand made, and all those things have been, saith the LORD: but to this man will I look, even to him that is poor and of a contrite spirit, and trembleth at my word.</text:span></text:p>
          </table:table-cell>
        </table:table-row>
        <table:table-row>
          <table:table-cell table:style-name="Table3.A2" office:value-type="string">
            <text:p text:style-name="P5">Acts 17:24-28</text:p>
            <text:p text:style-name="Table_20_Contents"><text:span text:style-name="T6">God that made the world and all things therein, seeing that he is Lord of heaven and earth, </text:span><text:span text:style-name="T7">dwelleth not in temples made with hands</text:span><text:span text:style-name="T6">; [</text:span><text:span text:style-name="T9">25</text:span><text:span text:style-name="T6">] </text:span><text:span text:style-name="T10">Neither is worshipped with men's hands, as though he needed any thing, seeing he giveth to all life, and breath, and all things;</text:span><text:span text:style-name="T6"> [</text:span><text:span text:style-name="T9">26</text:span><text:span text:style-name="T6">] And hath made of one blood all nations of men for to dwell on all the face of the earth, and hath determined the times before appointed, and the bounds of their habitation; [</text:span><text:span text:style-name="T9">27</text:span><text:span text:style-name="T6">] That they should seek the Lord, if haply they might feel after him, and find him, though he be not far from every one of us: [</text:span><text:span text:style-name="T9">28</text:span><text:span text:style-name="T6">] </text:span><text:span text:style-name="T11">For in him we live, and move, and have our being</text:span><text:span text:style-name="T6">; as certain also of your own poets have said, For we are also his offspring.</text:span></text:p>
          </table:table-cell>
          <table:table-cell table:style-name="Table3.B2" office:value-type="string">
            <text:p text:style-name="P5">John 4:23-24</text:p>
            <text:p text:style-name="Table_20_Contents"><text:span text:style-name="T12">But the hour cometh, and now is, when the true worshippers shall worship the Father in spirit and in truth: for the Father seeketh such to worship him.</text:span><text:span text:style-name="T6"> [</text:span><text:span text:style-name="T9">24</text:span><text:span text:style-name="T6">] </text:span><text:span text:style-name="T12">God is a Spirit: and they that worship him must worship him in spirit and in truth.</text:span></text:p>
          </table:table-cell>
        </table:table-row>
      </table:table>
      <text:p text:style-name="P14"/>
      <text:p text:style-name="P16"/>
      <text:p text:style-name="P16"/>
      <text:p text:style-name="P16"/>
      <text:p text:style-name="P16"><text:soft-page-break/></text:p>
      <text:list xml:id="list4289835812" text:style-name="L1">
        <text:list-item>
          <text:p text:style-name="P17">The study verse occurs during a prayer of Solomon</text:p>
        </text:list-item>
      </text:list>
      <text:p text:style-name="P18"/>
      <text:list text:style-name="L2">
        <text:list-item>
          <text:p text:style-name="P19">Solomon builds the temple in Jerusalem and properly moves the ark of the covenant into the new temple from the tabernacle.</text:p>
        </text:list-item>
        <text:list-item>
          <text:p text:style-name="P19">There is a “dedication ceremony”</text:p>
        </text:list-item>
        <text:list-item>
          <text:p text:style-name="P19">Solomon blesses the congregation of Israel and God</text:p>
        </text:list-item>
        <text:list-item>
          <text:p text:style-name="P19">Solomon’s prayer</text:p>
        </text:list-item>
        <text:list-item>
          <text:p text:style-name="P19">Solomon blesses the congregation of Israel</text:p>
        </text:list-item>
        <text:list-item>
          <text:p text:style-name="P20">142,000 cattle are offered as sacrifices (oxen and sheep)</text:p>
        </text:list-item>
        <text:list-item>
          <text:p text:style-name="P20">A 14-day feast occurs</text:p>
        </text:list-item>
      </text:list>
      <text:p text:style-name="P21"/>
      <text:list text:continue-list="list4289835812" text:style-name="L1">
        <text:list-item>
          <text:p text:style-name="P22"><text:span text:style-name="T13">Take note and k</text:span><text:span text:style-name="T14">eep in mind that the study verse </text:span><text:span text:style-name="T15">appears</text:span><text:span text:style-name="T14"> in a </text:span><text:span text:style-name="T16">prayer</text:span><text:span text:style-name="T14"> and </text:span><text:span text:style-name="T13">the format of that prayer </text:span><text:span text:style-name="T14">follow</text:span><text:span text:style-name="T13">s</text:span><text:span text:style-name="T14"> the model that Jesus gave to us in </text:span><text:span text:style-name="T9">Matthew 6:9-13</text:span><text:span text:style-name="T14">. The </text:span><text:span text:style-name="T17">general</text:span><text:span text:style-name="T14"> format </text:span><text:span text:style-name="T18">of the model prayer is as follows</text:span><text:span text:style-name="T14">:</text:span></text:p>
          <text:list>
            <text:list-item>
              <text:p text:style-name="P22"><text:span text:style-name="T14">Praise </text:span><text:span text:style-name="T19">(</text:span><text:span text:style-name="T9">I Kings 8:22-28</text:span><text:span text:style-name="T19">)</text:span></text:p>
            </text:list-item>
            <text:list-item>
              <text:p text:style-name="P23"><text:span text:style-name="T14">Ask </text:span><text:span text:style-name="T19">(</text:span><text:span text:style-name="T9">I Kings 8:29-50</text:span><text:span text:style-name="T19">)</text:span></text:p>
            </text:list-item>
            <text:list-item>
              <text:p text:style-name="P24"><text:span text:style-name="T14">Praise </text:span><text:span text:style-name="T19">(</text:span><text:span text:style-name="T9">I Kings 8:51-53</text:span><text:span text:style-name="T19">)</text:span></text:p>
            </text:list-item>
          </text:list>
        </text:list-item>
        <text:list-item>
          <text:p text:style-name="P25"><text:span text:style-name="T9">I Kings 8:27</text:span><text:span text:style-name="T20"> occurs during the first “praise” section of Solomon’s prayer.</text:span></text:p>
        </text:list-item>
        <text:list-item>
          <text:p text:style-name="P26">Solomon, in his wisdom gifted to him by God knew that God could not be contained within His own creation which included the temple that He enabled Solomon to build.</text:p>
        </text:list-item>
        <text:list-item>
          <text:p text:style-name="P26">Solomon compares the heaven (the sky) and the heaven of heavens (the sky of skies, or the sky above the sky) to the magnificent temple that he built and acknowledges that if the former can’t contain God how much less could the <text:span text:style-name="T21">latter</text:span> contain God?</text:p>
        </text:list-item>
        <text:list-item>
          <text:p text:style-name="P26">This acknowledgement of the truth <text:span text:style-name="T22">simultaneously</text:span> exalt<text:span text:style-name="T22">s</text:span> and prais<text:span text:style-name="T22">es </text:span>God.</text:p>
        </text:list-item>
      </text:list>
      <text:p text:style-name="P27"/>
      <table:table table:name="Table4" table:style-name="Table4">
        <table:table-column table:style-name="Table4.A"/>
        <table:table-column table:style-name="Table4.B"/>
        <table:table-row>
          <table:table-cell table:style-name="Table4.A1" office:value-type="string">
            <text:p text:style-name="P28">H430</text:p>
          </table:table-cell>
          <table:table-cell table:style-name="Table4.B1" office:value-type="string">
            <text:p text:style-name="P7">אֱלֹהִים ʼĕlôhîym, el-o-heem'; plural of H433; gods in the ordinary sense; but specifically used (in the plural thus, especially with the article) of the supreme God; occasionally applied by way of deference to magistrates; and sometimes as a superlative:—angels, × exceeding, God (gods) (-dess, -ly), × (very) great, judges, × mighty.</text:p>
          </table:table-cell>
        </table:table-row>
        <table:table-row>
          <table:table-cell table:style-name="Table4.A2" office:value-type="string">
            <text:p text:style-name="P28">H433</text:p>
          </table:table-cell>
          <table:table-cell table:style-name="Table4.B2" office:value-type="string">
            <text:p text:style-name="P7">אֱלוֹהַּ ʼĕlôwahh, el-o'-ah; rarely (shortened) אֱלֹהַּ ʼĕlôahh; probably prolonged (emphatic) from H410; a deity or the Deityאֱלוֹהַּ ʼĕlôwahh, el-o'-ah; rarely (shortened) אֱלֹהַּ ʼĕlôahh; probably prolonged (emphatic) from H410; a deity or the Deity:—God, god. See H430.</text:p>
          </table:table-cell>
        </table:table-row>
        <table:table-row>
          <table:table-cell table:style-name="Table4.A2" office:value-type="string">
            <text:p text:style-name="P29">H3427</text:p>
          </table:table-cell>
          <table:table-cell table:style-name="Table4.B2" office:value-type="string">
            <text:p text:style-name="P7">יָשַׁב yâshab, yaw-shab'; a primitive root; properly, to sit down (specifically as judge. in ambush, in quiet); by implication, to dwell, to remain; causatively, to settle, to marry:—(make to) abide(-ing), continue, (cause to, make to) dwell(-ing), ease self, endure, establish, × fail, habitation, haunt, (make to) inhabit(-ant), make to keep (house), lurking, × marry(-ing), (bring again to) place, remain, return, seat, set(-tle), (down-) sit(-down, still, -ting down, -ting (place) -uate), take, tarry.</text:p>
          </table:table-cell>
        </table:table-row>
        <table:table-row>
          <table:table-cell table:style-name="Table4.A2" office:value-type="string">
            <text:p text:style-name="P30">H8064</text:p>
          </table:table-cell>
          <table:table-cell table:style-name="Table4.B2" office:value-type="string">
            <text:p text:style-name="P7">שָׁמַיִם shâmayim, shaw-mah'-yim; dual of an unused singular שָׁמֶה shâmeh; from an unused root meaning to be lofty; the sky (as aloft; the dual perhaps alluding to the visible arch in which the clouds move, as well as to the higher ether where the celestial bodies revolve):—air, × astrologer, heaven(-s).</text:p>
          </table:table-cell>
        </table:table-row>
        <table:table-row>
          <table:table-cell table:style-name="Table4.A2" office:value-type="string">
            <text:p text:style-name="P31">H3068</text:p>
          </table:table-cell>
          <table:table-cell table:style-name="Table4.B2" office:value-type="string">
            <text:p text:style-name="P7">יְהֹוָה Yᵉhôvâh, yeh-ho-vaw'; from H1961; (the) self-Existent or Eternal; Jeho-vah, Jewish national name of God:—Jehovah, the Lord. Compare H3050, H3069.</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13T09:20:30.916066479</meta:creation-date>
    <dc:date>2026-07-11T12:31:20.045251446</dc:date>
    <meta:editing-duration>PT6H27M53S</meta:editing-duration>
    <meta:editing-cycles>70</meta:editing-cycles>
    <meta:generator>LibreOffice/26.2.4.2$Linux_X86_64 LibreOffice_project/64a984c51f4702dbd3710b13428c673a2f1292e7</meta:generator>
    <meta:document-statistic meta:table-count="4" meta:image-count="0" meta:object-count="0" meta:page-count="3" meta:paragraph-count="49" meta:word-count="915" meta:character-count="5171" meta:non-whitespace-character-count="4326"/>
  </office:meta>
</office:document-meta>
</file>