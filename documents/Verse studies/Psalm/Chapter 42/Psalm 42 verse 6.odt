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Lucida_Sans_2.ttf" manifest:media-type="application/x-font-ttf"/>
  <manifest:file-entry manifest:full-path="Fonts/Font_Liberation_Sans_1.ttf" manifest:media-type="application/x-font-ttf"/>
  <manifest:file-entry manifest:full-path="Fonts/Font_Lucida_Sans_1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Fonts/Font_Liberation_Sans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Regular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/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paragraph-rsid="0022bac0"/>
    </style:style>
    <style:style style:name="P2" style:family="paragraph" style:parent-style-name="Standard">
      <style:text-properties officeooo:rsid="00243ca0" officeooo:paragraph-rsid="002446c4"/>
    </style:style>
    <style:style style:name="P3" style:family="paragraph" style:parent-style-name="Table_20_Contents">
      <style:text-properties officeooo:rsid="00122dd2" officeooo:paragraph-rsid="00122dd2"/>
    </style:style>
    <style:style style:name="P4" style:family="paragraph" style:parent-style-name="Table_20_Contents">
      <style:text-properties officeooo:rsid="00122dd2" officeooo:paragraph-rsid="0014a46e"/>
    </style:style>
    <style:style style:name="P5" style:family="paragraph" style:parent-style-name="Table_20_Contents">
      <style:text-properties officeooo:rsid="0013334d" officeooo:paragraph-rsid="0013334d"/>
    </style:style>
    <style:style style:name="P6" style:family="paragraph" style:parent-style-name="Standard">
      <style:text-properties officeooo:rsid="00243ca0"/>
    </style:style>
    <style:style style:name="T1" style:family="text">
      <style:text-properties fo:color="#127622" loext:opacity="100%"/>
    </style:style>
    <style:style style:name="T2" style:family="text">
      <style:text-properties style:text-position="super 58%" officeooo:rsid="00106b7d"/>
    </style:style>
    <style:style style:name="T3" style:family="text">
      <style:text-properties style:font-family-complex="'Galaxie Unicode Hebrew'" style:font-pitch-complex="variable"/>
    </style:style>
    <style:style style:name="T4" style:family="text">
      <style:text-properties officeooo:rsid="00138239"/>
    </style:style>
    <style:style style:name="T5" style:family="text">
      <style:text-properties officeooo:rsid="0014a46e"/>
    </style:style>
    <style:style style:name="T6" style:family="text">
      <style:text-properties officeooo:rsid="001de2a7"/>
    </style:style>
    <style:style style:name="T7" style:family="text">
      <style:text-properties officeooo:rsid="00179354"/>
    </style:style>
    <style:style style:name="T8" style:family="text">
      <style:text-properties officeooo:rsid="00195798"/>
    </style:style>
    <style:style style:name="T9" style:family="text">
      <style:text-properties officeooo:rsid="001d0e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salms 42:6</text:span><text:line-break/>O my God, my soul is cast down within me: therefore will I remember thee from the land of Jordan<text:span text:style-name="T2">H3383</text:span>, and of the Hermonites<text:span text:style-name="T2">H2769</text:span>, from the hill Mizar<text:span text:style-name="T2">H4706</text:span>.</text:p>
      <text:p text:style-name="P1"/>
      <text:p text:style-name="P1"/>
      <text:p text:style-name="P2">The Jordan river valley is the lowest elevation on Earth at 1,443 feet below sea level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H3383</text:p>
            <text:p text:style-name="Table_20_Contents"><text:span text:style-name="T3">יַרְדֵּן</text:span> (Yardên | yar-dane')</text:p>
            <text:p text:style-name="Table_20_Contents">Derivation: from <text:span text:style-name="T3">יָרַד</text:span> <text:span text:style-name="T4">(H3381)</text:span>; a descender;</text:p>
            <text:p text:style-name="Table_20_Contents">Strong's: Jarden, the principal river of Palestine</text:p>
            <text:p text:style-name="Table_20_Contents">KJV: Jordan.</text:p>
          </table:table-cell>
        </table:table-row>
        <table:table-row>
          <table:table-cell table:style-name="Table2.A2" office:value-type="string">
            <text:p text:style-name="P3">H3381</text:p>
            <text:p text:style-name="P3"><text:span text:style-name="T3">יָרַד</text:span> (yârad | yaw-rad')</text:p>
            <text:p text:style-name="P3">Derivation: a primitive root;</text:p>
            <text:p text:style-name="P3">KJV: [idiom] abundantly, bring down, carry down, cast down, (cause to) come(-ing) down, fall (down), get down, go(-ing) down(-ward), hang down, [idiom] indeed, let down, light (down), put down (off), (cause to, let) run down, sink, subdue, take down.</text:p>
          </table:table-cell>
        </table:table-row>
      </table:table>
      <text:p text:style-name="Standard"/>
      <text:p text:style-name="P2"/>
      <text:p text:style-name="P2">Mount Hermon is the highest location in Israel at 9,232 feet above sea level.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">H2769</text:p>
            <text:p text:style-name="Table_20_Contents"><text:span text:style-name="T3">חֶרְמֹונִים</text:span> (Chermôwnîym | kher-mo-neem')</text:p>
            <text:p text:style-name="Table_20_Contents">Derivation: plural of <text:span text:style-name="T3">חֶרְמֹון</text:span> <text:span text:style-name="T5">(H2768)</text:span>;</text:p>
            <text:p text:style-name="Table_20_Contents">KJV: the Hermonites.</text:p>
          </table:table-cell>
        </table:table-row>
        <table:table-row>
          <table:table-cell table:style-name="Table3.A2" office:value-type="string">
            <text:p text:style-name="P3">H2768</text:p>
            <text:p text:style-name="P3"><text:span text:style-name="T3">חֶרְמֹון</text:span> (Chermôwn | kher-mone')</text:p>
            <text:p text:style-name="P4">Derivation: from <text:span text:style-name="T3">חָרַם</text:span> <text:span text:style-name="T5">(H2763)</text:span>; abrupt;</text:p>
            <text:p text:style-name="P4">Strong's: Chermon, a mount of Palestine</text:p>
            <text:p text:style-name="P3">KJV: Hermon.</text:p>
          </table:table-cell>
        </table:table-row>
        <table:table-row>
          <table:table-cell table:style-name="Table3.A2" office:value-type="string">
            <text:p text:style-name="P3">H2763</text:p>
            <text:p text:style-name="P3">חָרַם (châram | khaw-ram')</text:p>
            <text:p text:style-name="P3">Derivation: a primitive root;</text:p>
            <text:p text:style-name="P3">KJV: make accursed, consecrate, (utterly) destroy, devote<text:span text:style-name="T6">(d)</text:span>, forfeit, have a flat nose, utterly (slay, make away).</text:p>
          </table:table-cell>
        </table:table-row>
      </table:table>
      <text:p text:style-name="Standard"/>
      <text:p text:style-name="Standard"/>
      <text:p text:style-name="P2">The hill Mizar is a small hill in an undisclosed location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">H4706</text:p>
            <text:p text:style-name="Table_20_Contents"><text:span text:style-name="T3">מִצְעָר</text:span> (Mitsʻâr | mits-awr')</text:p>
            <text:p text:style-name="Table_20_Contents">Derivation: the same as <text:span text:style-name="T3">מִצְעָר</text:span> <text:span text:style-name="T7">(H4705)</text:span>;</text:p>
            <text:p text:style-name="Table_20_Contents">Strong's: Mitsar, a peak of Lebanon</text:p>
            <text:p text:style-name="Table_20_Contents">KJV: Mizar.</text:p>
          </table:table-cell>
        </table:table-row>
        <table:table-row>
          <table:table-cell table:style-name="Table4.A2" office:value-type="string">
            <text:p text:style-name="P5">H4705</text:p>
            <text:p text:style-name="P5"><text:span text:style-name="T3">מִצְעָר</text:span> (mitsʻâr | mits-awr')</text:p>
            <text:p text:style-name="P5">Derivation: from <text:span text:style-name="T3">צָעַר</text:span> <text:span text:style-name="T8">(H6819)</text:span>;</text:p>
            <text:p text:style-name="P5"><text:soft-page-break/>KJV: little one, <text:span text:style-name="T9">little while, </text:span>small.</text:p>
          </table:table-cell>
        </table:table-row>
        <table:table-row>
          <table:table-cell table:style-name="Table4.A2" office:value-type="string">
            <text:p text:style-name="P5">H6819</text:p>
            <text:p text:style-name="P5"><text:span text:style-name="T3">צָעַר</text:span> (tsâʻar | tsaw-ar')</text:p>
            <text:p text:style-name="P5">Derivation: a primitive root;</text:p>
            <text:p text:style-name="P5">KJV: be brought low, little one, be small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Regular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/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31T13:29:47.450573700</meta:creation-date>
    <dc:title>default</dc:title>
    <meta:editing-duration>PT42M20S</meta:editing-duration>
    <meta:editing-cycles>24</meta:editing-cycles>
    <meta:generator>LibreOffice/25.8.1.1$Windows_X86_64 LibreOffice_project/54047653041915e595ad4e45cccea684809c77b5</meta:generator>
    <dc:date>2025-08-31T15:02:51.075731200</dc:date>
    <meta:document-statistic meta:table-count="3" meta:image-count="0" meta:object-count="0" meta:page-count="2" meta:paragraph-count="39" meta:word-count="246" meta:character-count="1533" meta:non-whitespace-character-count="1326"/>
    <meta:template xlink:type="simple" xlink:actuate="onRequest" xlink:title="default" xlink:href="../../../../../../../AppData/Roaming/LibreOffice/4/user/template/default.ott" meta:date="2025-08-31T13:29:46.489890600"/>
  </office:meta>
</office:document-meta>
</file>