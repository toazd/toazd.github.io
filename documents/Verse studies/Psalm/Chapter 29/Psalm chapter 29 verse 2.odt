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0.7917in" style:rel-column-width="6567*"/>
    </style:style>
    <style:style style:name="Table6.B" style:family="table-column">
      <style:table-column-properties style:column-width="7.1083in" style:rel-column-width="58968*"/>
    </style:style>
    <style:style style:name="Table6.A1" style:family="table-cell">
      <style:table-cell-properties style:vertical-align="middle"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style:vertical-align="middle"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6.B3" style:family="table-cell">
      <style:table-cell-properties fo:padding="0.0382in" fo:border-left="0.5pt solid #000000" fo:border-right="0.5pt solid #000000" fo:border-top="none" fo:border-bottom="0.5pt solid #000000"/>
    </style:style>
    <style:style style:name="Table6.B4" style:family="table-cell">
      <style:table-cell-properties fo:padding="0.0382in" fo:border-left="0.5pt solid #000000" fo:border-right="0.5pt solid #000000" fo:border-top="none" fo:border-bottom="0.5pt solid #000000"/>
    </style:style>
    <style:style style:name="Table6.B5" style:family="table-cell">
      <style:table-cell-properties fo:padding="0.0382in" fo:border-left="0.5pt solid #000000" fo:border-right="0.5pt solid #000000" fo:border-top="none" fo:border-bottom="0.5pt solid #000000"/>
    </style:style>
    <style:style style:name="Table6.B6" style:family="table-cell">
      <style:table-cell-properties fo:padding="0.0382in" fo:border-left="0.5pt solid #000000" fo:border-right="0.5pt solid #000000" fo:border-top="none" fo:border-bottom="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3.95in" style:rel-column-width="32767*"/>
    </style:style>
    <style:style style:name="Table3.B" style:family="table-column">
      <style:table-column-properties style:column-width="3.9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7.9in" table:align="margins"/>
    </style:style>
    <style:style style:name="Table4.A" style:family="table-column">
      <style:table-column-properties style:column-width="3.1667in" style:rel-column-width="26269*"/>
    </style:style>
    <style:style style:name="Table4.B" style:family="table-column">
      <style:table-column-properties style:column-width="4.7333in" style:rel-column-width="39266*"/>
    </style:style>
    <style:style style:name="Table4.A1" style:family="table-cell">
      <style:table-cell-properties style:vertical-align="middle"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style:vertical-align="middle"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B3" style:family="table-cell">
      <style:table-cell-properties fo:padding="0.0382in" fo:border-left="0.5pt solid #000000" fo:border-right="0.5pt solid #000000" fo:border-top="none" fo:border-bottom="0.5pt solid #000000"/>
    </style:style>
    <style:style style:name="P1" style:family="paragraph" style:parent-style-name="Standard">
      <style:text-properties fo:color="#127622" loext:opacity="100%" fo:font-weight="bold" style:font-weight-asian="bold" style:font-weight-complex="bold"/>
    </style:style>
    <style:style style:name="P2" style:family="paragraph" style:parent-style-name="Standard">
      <style:text-properties officeooo:rsid="00082a8d"/>
    </style:style>
    <style:style style:name="P3" style:family="paragraph" style:parent-style-name="Standard">
      <style:text-properties officeooo:rsid="00267d30" officeooo:paragraph-rsid="00267d30"/>
    </style:style>
    <style:style style:name="P4" style:family="paragraph" style:parent-style-name="Standard">
      <style:paragraph-properties fo:text-align="center" style:justify-single-word="false"/>
      <style:text-properties fo:color="#127622" loext:opacity="100%" officeooo:rsid="001b4f1d" officeooo:paragraph-rsid="001b4f1d"/>
    </style:style>
    <style:style style:name="P5" style:family="paragraph" style:parent-style-name="Standard">
      <style:text-properties officeooo:paragraph-rsid="00082a8d"/>
    </style:style>
    <style:style style:name="P6" style:family="paragraph" style:parent-style-name="Standard" style:list-style-name="L1">
      <style:text-properties officeooo:rsid="00082a8d" officeooo:paragraph-rsid="00082a8d"/>
    </style:style>
    <style:style style:name="P7" style:family="paragraph" style:parent-style-name="Table_20_Contents">
      <style:paragraph-properties fo:text-align="center" style:justify-single-word="false"/>
      <style:text-properties officeooo:rsid="0012e688" officeooo:paragraph-rsid="0012e688"/>
    </style:style>
    <style:style style:name="P8" style:family="paragraph" style:parent-style-name="Table_20_Contents">
      <style:text-properties fo:color="#127622" loext:opacity="100%" officeooo:paragraph-rsid="0012e688"/>
    </style:style>
    <style:style style:name="P9" style:family="paragraph" style:parent-style-name="Table_20_Contents">
      <style:text-properties officeooo:paragraph-rsid="0012e688"/>
    </style:style>
    <style:style style:name="P10" style:family="paragraph" style:parent-style-name="Table_20_Contents">
      <style:text-properties style:use-window-font-color="true" loext:opacity="0%" officeooo:paragraph-rsid="0012e688"/>
    </style:style>
    <style:style style:name="P11" style:family="paragraph" style:parent-style-name="Table_20_Contents">
      <style:text-properties fo:color="#127622" loext:opacity="100%" officeooo:rsid="001b4f1d" officeooo:paragraph-rsid="0012e688"/>
    </style:style>
    <style:style style:name="P12" style:family="paragraph" style:parent-style-name="Table_20_Contents">
      <style:text-properties fo:color="#127622" loext:opacity="100%" officeooo:rsid="001b4f1d" officeooo:paragraph-rsid="00195851"/>
    </style:style>
    <style:style style:name="P13" style:family="paragraph" style:parent-style-name="Table_20_Contents">
      <style:text-properties officeooo:paragraph-rsid="00195851"/>
    </style:style>
    <style:style style:name="P14" style:family="paragraph" style:parent-style-name="Table_20_Contents">
      <style:paragraph-properties fo:text-align="center" style:justify-single-word="false"/>
      <style:text-properties officeooo:rsid="0014d755" officeooo:paragraph-rsid="0014d755"/>
    </style:style>
    <style:style style:name="P15" style:family="paragraph" style:parent-style-name="Table_20_Contents">
      <style:text-properties fo:color="#127622" loext:opacity="100%" officeooo:paragraph-rsid="0016f2f0"/>
    </style:style>
    <style:style style:name="P16" style:family="paragraph" style:parent-style-name="Table_20_Contents">
      <style:text-properties officeooo:paragraph-rsid="0016f2f0"/>
    </style:style>
    <style:style style:name="P17" style:family="paragraph" style:parent-style-name="Table_20_Contents">
      <style:text-properties fo:color="#127622" loext:opacity="100%"/>
    </style:style>
    <style:style style:name="P18" style:family="paragraph" style:parent-style-name="Table_20_Contents">
      <style:paragraph-properties fo:text-align="center" style:justify-single-word="false"/>
      <style:text-properties officeooo:rsid="003ccbdb" officeooo:paragraph-rsid="003ccbdb"/>
    </style:style>
    <style:style style:name="P19" style:family="paragraph" style:parent-style-name="Table_20_Contents">
      <style:text-properties style:use-window-font-color="true" loext:opacity="0%" officeooo:paragraph-rsid="0016f2f0"/>
    </style:style>
    <style:style style:name="P20" style:family="paragraph" style:parent-style-name="Standard">
      <style:paragraph-properties fo:text-align="center" style:justify-single-word="false"/>
      <style:text-properties fo:color="#127622" loext:opacity="100%" officeooo:rsid="001b4f1d" officeooo:paragraph-rsid="0024fcd0"/>
    </style:style>
    <style:style style:name="P21" style:family="paragraph" style:parent-style-name="Standard">
      <style:text-properties officeooo:paragraph-rsid="0024fcd0"/>
    </style:style>
    <style:style style:name="P22" style:family="paragraph" style:parent-style-name="Standard" style:list-style-name="L2">
      <style:text-properties officeooo:rsid="0025c8c2" officeooo:paragraph-rsid="0025c8c2"/>
    </style:style>
    <style:style style:name="P23" style:family="paragraph" style:parent-style-name="Standard">
      <style:text-properties officeooo:rsid="0025c8c2" officeooo:paragraph-rsid="0025c8c2"/>
    </style:style>
    <style:style style:name="P24" style:family="paragraph" style:parent-style-name="Table_20_Contents">
      <style:text-properties fo:color="#127622" loext:opacity="100%" officeooo:rsid="0025e46d" officeooo:paragraph-rsid="0025e46d"/>
    </style:style>
    <style:style style:name="P25" style:family="paragraph" style:parent-style-name="Table_20_Contents">
      <style:text-properties officeooo:rsid="0025e46d" officeooo:paragraph-rsid="0025e46d"/>
    </style:style>
    <style:style style:name="P26" style:family="paragraph" style:parent-style-name="Table_20_Contents">
      <style:text-properties officeooo:rsid="0027e5d2" officeooo:paragraph-rsid="0027e5d2"/>
    </style:style>
    <style:style style:name="P27" style:family="paragraph" style:parent-style-name="Table_20_Contents">
      <style:text-properties officeooo:rsid="0029a64e" officeooo:paragraph-rsid="002b9fa8"/>
    </style:style>
    <style:style style:name="P28" style:family="paragraph" style:parent-style-name="Table_20_Contents">
      <style:text-properties fo:background-color="#fff5ce"/>
    </style:style>
    <style:style style:name="P29" style:family="paragraph" style:parent-style-name="Table_20_Contents">
      <style:text-properties officeooo:rsid="002d4790" officeooo:paragraph-rsid="002d4790"/>
    </style:style>
    <style:style style:name="P30" style:family="paragraph" style:parent-style-name="Table_20_Contents">
      <style:text-properties officeooo:rsid="002f04fa" officeooo:paragraph-rsid="002f04fa"/>
    </style:style>
    <style:style style:name="P31" style:family="paragraph" style:parent-style-name="Standard">
      <style:paragraph-properties fo:text-align="center" style:justify-single-word="false"/>
      <style:text-properties officeooo:rsid="003769f4" officeooo:paragraph-rsid="003769f4"/>
    </style:style>
    <style:style style:name="P32" style:family="paragraph" style:parent-style-name="Table_20_Contents">
      <style:paragraph-properties fo:text-align="center" style:justify-single-word="false"/>
      <style:text-properties officeooo:rsid="0032a1c1" officeooo:paragraph-rsid="0032a1c1"/>
    </style:style>
    <style:style style:name="P33" style:family="paragraph" style:parent-style-name="Table_20_Contents">
      <style:paragraph-properties fo:text-align="center" style:justify-single-word="false"/>
      <style:text-properties officeooo:rsid="0033dc2a" officeooo:paragraph-rsid="0033dc2a"/>
    </style:style>
    <style:style style:name="P34" style:family="paragraph" style:parent-style-name="Table_20_Contents">
      <style:paragraph-properties fo:text-align="center" style:justify-single-word="false"/>
      <style:text-properties officeooo:rsid="0033c501" officeooo:paragraph-rsid="0033c501" fo:background-color="#ffe994"/>
    </style:style>
    <style:style style:name="T1" style:family="text">
      <style:text-properties style:use-window-font-color="true" loext:opacity="0%" fo:font-weight="normal" style:font-weight-asian="normal" style:font-weight-complex="normal"/>
    </style:style>
    <style:style style:name="T2" style:family="text">
      <style:text-properties style:use-window-font-color="true" loext:opacity="0%" fo:font-weight="normal" officeooo:rsid="00267d30" style:font-weight-asian="normal" style:font-weight-complex="normal"/>
    </style:style>
    <style:style style:name="T3" style:family="text">
      <style:text-properties style:text-position="super 58%" officeooo:rsid="000c00ac"/>
    </style:style>
    <style:style style:name="T4" style:family="text">
      <style:text-properties officeooo:rsid="000dc66f"/>
    </style:style>
    <style:style style:name="T5" style:family="text">
      <style:text-properties fo:color="#127622" loext:opacity="100%"/>
    </style:style>
    <style:style style:name="T6" style:family="text">
      <style:text-properties officeooo:rsid="0012e688"/>
    </style:style>
    <style:style style:name="T7" style:family="text">
      <style:text-properties officeooo:rsid="001fc4ed"/>
    </style:style>
    <style:style style:name="T8" style:family="text">
      <style:text-properties officeooo:rsid="0024fcd0"/>
    </style:style>
    <style:style style:name="T9" style:family="text">
      <style:text-properties officeooo:rsid="00378ea7"/>
    </style:style>
    <style:style style:name="T10" style:family="text">
      <style:text-properties officeooo:rsid="00382c7c"/>
    </style:style>
    <style:style style:name="T11" style:family="text">
      <style:text-properties officeooo:rsid="003cea6a"/>
    </style:style>
    <style:style style:name="T12" style:family="text">
      <style:text-properties fo:background-color="#fff5ce" loext:char-shading-value="0"/>
    </style:style>
    <style:style style:name="T13" style:family="text">
      <style:text-properties fo:background-color="transparent" loext:char-shading-value="0"/>
    </style:style>
    <style:style style:name="T14" style:family="text">
      <style:text-properties style:text-underline-style="solid" style:text-underline-width="auto" style:text-underline-color="font-color"/>
    </style:style>
    <style:style style:name="T15" style:family="text">
      <style:text-properties style:text-underline-style="none" officeooo:rsid="002aaef2"/>
    </style:style>
    <style:style style:name="T16" style:family="text">
      <style:text-properties style:text-underline-style="none" officeooo:rsid="002b9fa8"/>
    </style:style>
    <style:style style:name="T17" style:family="text">
      <style:text-properties officeooo:rsid="002aaef2"/>
    </style:style>
    <style:style style:name="T18" style:family="text">
      <style:text-properties officeooo:rsid="002b9fa8"/>
    </style:style>
    <style:style style:name="T19" style:family="text">
      <style:text-properties officeooo:rsid="002b4061"/>
    </style:style>
    <style:style style:name="T20" style:family="text">
      <style:text-properties officeooo:rsid="00386b88"/>
    </style:style>
    <style:style style:name="T21" style:family="text">
      <style:text-properties officeooo:rsid="00321ee2"/>
    </style:style>
    <style:style style:name="T22" style:family="text">
      <style:text-properties officeooo:rsid="003c0cce"/>
    </style:style>
    <style:style style:name="T23" style:family="text">
      <style:text-properties officeooo:rsid="003c36d8"/>
    </style:style>
    <style:style style:name="T24" style:family="text">
      <style:text-properties officeooo:rsid="003878d5"/>
    </style:style>
    <style:style style:name="T25" style:family="text">
      <style:text-properties officeooo:rsid="00396a11"/>
    </style:style>
    <style:style style:name="T26" style:family="text">
      <style:text-properties officeooo:rsid="003b0d14"/>
    </style:style>
    <style:style style:name="T27" style:family="text">
      <style:text-properties officeooo:rsid="003b6f31"/>
    </style:style>
    <style:style style:name="T28" style:family="text">
      <style:text-properties fo:background-color="#ffff00" loext:char-shading-value="0"/>
    </style:style>
    <style:style style:name="T29" style:family="text">
      <style:text-properties fo:background-color="#ffe994"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salm 29:2<text:span text:style-name="T1"> </text:span><text:span text:style-name="T2">(A psalm of David)</text:span></text:p>
      <text:p text:style-name="Standard">Give unto the LORD the glory due unto his name; worship the LORD in the beauty<text:span text:style-name="T3">H1927</text:span> of holiness<text:span text:style-name="T3">H6944</text:span>.</text:p>
      <text:p text:style-name="P2"/>
      <text:p text:style-name="P3"/>
      <text:p text:style-name="P4">Psalm 29:2a</text:p>
      <table:table table:name="Table1" table:style-name="Table1">
        <table:table-column table:style-name="Table1.A"/>
        <table:table-row>
          <table:table-cell table:style-name="Table1.A1" office:value-type="string">
            <text:p text:style-name="P5">Give unto the LORD the glory due unto his name; </text:p>
          </table:table-cell>
        </table:table-row>
      </table:table>
      <text:p text:style-name="Standard"/>
      <text:list text:style-name="L1">
        <text:list-item>
          <text:p text:style-name="P6">What are some things we can praise God for doing?</text:p>
        </text:list-item>
      </text:list>
      <text:p text:style-name="Standard"/>
      <table:table table:name="Table6" table:style-name="Table6">
        <table:table-column table:style-name="Table6.A"/>
        <table:table-column table:style-name="Table6.B"/>
        <table:table-row>
          <table:table-cell table:style-name="Table6.A1" office:value-type="string">
            <text:p text:style-name="P7">Creator</text:p>
          </table:table-cell>
          <table:table-cell table:style-name="Table6.B1" office:value-type="string">
            <text:p text:style-name="P8">Genesis 1:1</text:p>
            <text:p text:style-name="P9">In the beginning God created the heaven and the earth.</text:p>
            <text:p text:style-name="P9"/>
            <text:p text:style-name="P8">John 1:3</text:p>
            <text:p text:style-name="P9">All things were made by him; and without him was not any thing made that was made.</text:p>
          </table:table-cell>
        </table:table-row>
        <table:table-row>
          <table:table-cell table:style-name="Table6.A2" office:value-type="string">
            <text:p text:style-name="P7">Saviour</text:p>
          </table:table-cell>
          <table:table-cell table:style-name="Table6.B2" office:value-type="string">
            <text:p text:style-name="P8">Genesis 22:8</text:p>
            <text:p text:style-name="P10">And Abraham said, My son, God will provide himself a lamb for a burnt offering: so they went both of them together.</text:p>
            <text:p text:style-name="P8"/>
            <text:p text:style-name="P8">Isaiah 9:6</text:p>
            <text:p text:style-name="P10">For unto us a child is born, unto us a son is given: and the government shall be upon his shoulder: and his name shall be called Wonderful, Counsellor, The mighty God, The everlasting Father, The Prince of Peace.</text:p>
            <text:p text:style-name="P8"/>
            <text:p text:style-name="P8">Psalm 62:7</text:p>
            <text:p text:style-name="P9">In God is my salvation and my glory: the rock of my strength, and my refuge, is in God.</text:p>
            <text:p text:style-name="P9"/>
            <text:p text:style-name="P8">Luke 2:14</text:p>
            <text:p text:style-name="P9">Glory to God in the highest, and on earth peace, good will toward men.</text:p>
            <text:p text:style-name="P9"/>
            <text:p text:style-name="P8">Philippians 1:11</text:p>
            <text:p text:style-name="P9">Being filled with the fruits of righteousness, which are by Jesus Christ, unto the glory and praise of God.</text:p>
            <text:p text:style-name="P9"/>
            <text:p text:style-name="P8">Hebrews 12:2<text:span text:style-name="T4">a</text:span></text:p>
            <text:p text:style-name="P9">Looking unto Jesus the author and finisher of our faith;</text:p>
          </table:table-cell>
        </table:table-row>
        <table:table-row>
          <table:table-cell table:style-name="Table6.A2" office:value-type="string">
            <text:p text:style-name="P7">Provider</text:p>
          </table:table-cell>
          <table:table-cell table:style-name="Table6.B2" office:value-type="string">
            <text:p text:style-name="P8">James 1:17</text:p>
            <text:p text:style-name="P9">Every good gift and every perfect gift is from above, and cometh down from the Father of lights, with whom is no variableness, neither shadow of turning.</text:p>
            <text:p text:style-name="P9"/>
            <text:p text:style-name="P8">Philippians 4:19</text:p>
            <text:p text:style-name="P9">But my God shall supply all your need according to his riches in glory by Christ Jesus.</text:p>
            <text:p text:style-name="P9"/>
            <text:p text:style-name="P11">Hebrews 2:18</text:p>
            <text:p text:style-name="P9">For in that he himself hath suffered being tempted, he is able to succour them that are tempted.</text:p>
            <text:p text:style-name="P9"/>
            <text:p text:style-name="P12">John 14:18</text:p>
            <text:p text:style-name="P13">I will not leave you comfortless: I will come to you.</text:p>
            <text:p text:style-name="P13"/>
            <text:p text:style-name="P11">John 14:26</text:p>
            <text:p text:style-name="P9">But the Comforter, which is the Holy Ghost, whom the Father will send in my name, he shall teach you all things, and bring all things to your remembrance, whatsoever I have said unto you.</text:p>
          </table:table-cell>
        </table:table-row>
        <text:soft-page-break/>
        <table:table-row>
          <table:table-cell table:style-name="Table6.A2" office:value-type="string">
            <text:p text:style-name="P7">Sustainer</text:p>
          </table:table-cell>
          <table:table-cell table:style-name="Table6.B2" office:value-type="string">
            <text:p text:style-name="P9"><text:span text:style-name="T5">Deuteronomy</text:span> <text:span text:style-name="T5">8:3</text:span> <text:span text:style-name="T6">(</text:span><text:span text:style-name="T5">Mt. 4:4</text:span><text:span text:style-name="T6">, </text:span><text:span text:style-name="T5">Lk. 4:4</text:span><text:span text:style-name="T6">)</text:span></text:p>
            <text:p text:style-name="P9">And he humbled thee, and suffered thee to hunger, and fed thee with manna, which thou knewest not, neither did thy fathers know; that he might make thee know that man doth not live by bread only, but by every word that proceedeth out of the mouth of the LORD doth man live.</text:p>
            <text:p text:style-name="P9"/>
            <text:p text:style-name="P8">2 Samuel 22:33a</text:p>
            <text:p text:style-name="P9">God is my strength and power:</text:p>
            <text:p text:style-name="P9"/>
            <text:p text:style-name="P8">1 Corinthians 15:45</text:p>
            <text:p text:style-name="P9">And so it is written, The first man Adam was made a living soul; the last Adam was made a quickening spirit.</text:p>
          </table:table-cell>
        </table:table-row>
        <table:table-row>
          <table:table-cell table:style-name="Table6.A2" office:value-type="string">
            <text:p text:style-name="P14">Guide</text:p>
          </table:table-cell>
          <table:table-cell table:style-name="Table6.B5" office:value-type="string">
            <text:p text:style-name="P15">Deuteronomy 4:29</text:p>
            <text:p text:style-name="P16">But if from thence thou shalt seek the LORD thy God, thou shalt find him, if thou seek him with all thy heart and with all thy soul.</text:p>
            <text:p text:style-name="P16"/>
            <text:p text:style-name="P15">Psalm 119:105</text:p>
            <text:p text:style-name="Table_20_Contents">Thy word is a lamp unto my feet, and a light unto my path.</text:p>
            <text:p text:style-name="Table_20_Contents"/>
            <text:p text:style-name="P17">Proverbs 3:5-6</text:p>
            <text:p text:style-name="Table_20_Contents">Trust in the LORD with all thine heart; and lean not unto thine own understanding. [6] In all thy ways acknowledge him, and he shall direct thy paths.</text:p>
          </table:table-cell>
        </table:table-row>
        <table:table-row>
          <table:table-cell table:style-name="Table6.A2" office:value-type="string">
            <text:p text:style-name="P18">Many more...</text:p>
          </table:table-cell>
          <table:table-cell table:style-name="Table6.B6" office:value-type="string">
            <text:p text:style-name="P15">John 15:2</text:p>
            <text:p text:style-name="P19">Every branch in me that beareth not fruit he taketh away: and every branch that beareth fruit, he purgeth it, that it may bring forth more fruit.</text:p>
            <text:p text:style-name="P15"/>
            <text:p text:style-name="P15">Hebrews 12:6</text:p>
            <text:p text:style-name="P19">For whom the Lord loveth he chasteneth, and scourgeth every son whom he receiveth.</text:p>
            <text:p text:style-name="P15"/>
            <text:p text:style-name="P15">Romans 8:28</text:p>
            <text:p text:style-name="P19">And we know that all things work together for good to them that love God, to them who are the called according to his purpose.</text:p>
            <text:p text:style-name="P15"/>
            <text:p text:style-name="P15">2 Corinthians 9:8</text:p>
            <text:p text:style-name="P19">And God is able to make all grace abound toward you; that ye, always having all sufficiency in all things, may abound to every good work:</text:p>
            <text:p text:style-name="P19"/>
            <text:p text:style-name="P15">Colossians 2:10</text:p>
            <text:p text:style-name="P19">And ye are complete in him, which is the head of all principality and power:</text:p>
            <text:p text:style-name="P19"/>
            <text:p text:style-name="P15">Psalm 18:2</text:p>
            <text:p text:style-name="P19">The LORD is my rock, and my fortress, and my deliverer; my God, my strength, in whom I will trust; my buckler, and the horn of my salvation, and my high tower.</text:p>
            <text:p text:style-name="P19"/>
            <text:p text:style-name="P15">Isaiah 59:19<text:span text:style-name="T7">c,19d</text:span></text:p>
            <text:p text:style-name="P19">When the enemy shall come in like a flood, the Spirit of the LORD shall lift up a standard against him.</text:p>
            <text:p text:style-name="P19"/>
            <text:p text:style-name="P15">Jeremiah 9:24</text:p>
            <text:p text:style-name="P19">But let him that glorieth glory in this, that he understandeth and knoweth me, that I am the LORD which exercise lovingkindness, judgment, and righteousness, in the earth: for in these things I delight, saith the LORD.</text:p>
          </table:table-cell>
        </table:table-row>
      </table:table>
      <text:p text:style-name="Standard"/>
      <text:p text:style-name="P20"><text:soft-page-break/>Psalm 29:2<text:span text:style-name="T8">b</text:span></text:p>
      <table:table table:name="Table2" table:style-name="Table2">
        <table:table-column table:style-name="Table2.A"/>
        <table:table-row>
          <table:table-cell table:style-name="Table2.A1" office:value-type="string">
            <text:p text:style-name="P21">worship the LORD in the beauty<text:span text:style-name="T3">H1927</text:span> of holiness<text:span text:style-name="T3">H6944</text:span>.</text:p>
          </table:table-cell>
        </table:table-row>
      </table:table>
      <text:p text:style-name="P21"/>
      <text:list text:style-name="L2">
        <text:list-item>
          <text:p text:style-name="P22">The phrase “beauty of holiness” appears four times in scripture. <text:span text:style-name="T9">The exact same </text:span><text:span text:style-name="T10">pair of </text:span><text:span text:style-name="T9">phrases appear</text:span><text:span text:style-name="T11">s</text:span><text:span text:style-name="T9"> three times.</text:span></text:p>
        </text:list-item>
      </text:list>
      <text:p text:style-name="P23"/>
      <table:table table:name="Table3" table:style-name="Table3">
        <table:table-column table:style-name="Table3.A"/>
        <table:table-column table:style-name="Table3.B"/>
        <table:table-row>
          <table:table-cell table:style-name="Table3.A1" office:value-type="string">
            <text:p text:style-name="P24">I Chronicles 16:29</text:p>
            <text:p text:style-name="P25"><text:span text:style-name="T12">Give unto the LORD the glory due unto his name</text:span><text:span text:style-name="T13">: </text:span>bring an offering, and come before him: <text:span text:style-name="T12">worship the LORD in the beauty of holiness.</text:span></text:p>
          </table:table-cell>
          <table:table-cell table:style-name="Table3.B1" office:value-type="string">
            <text:p text:style-name="P26">A Psalm of David during the festival and after the sacrifices when David moved the Ark to Jerusalem.</text:p>
          </table:table-cell>
        </table:table-row>
        <table:table-row>
          <table:table-cell table:style-name="Table3.A2" office:value-type="string">
            <text:p text:style-name="P24">2 Chronicles 20:21</text:p>
            <text:p text:style-name="P25">And when he had consulted with the people, he appointed singers unto the LORD, and that should praise the beauty of holiness, as they went out before the army, and to say, Praise the LORD; for his mercy endureth for ever.</text:p>
          </table:table-cell>
          <table:table-cell table:style-name="Table3.B2" office:value-type="string">
            <text:p text:style-name="P27">Jehoshaphat (king of Judah) appoints singers to go out <text:span text:style-name="T14">before the army</text:span> <text:span text:style-name="T15">(ahead of </text:span><text:span text:style-name="T16">the army</text:span><text:span text:style-name="T15">)</text:span><text:span text:style-name="T16"> </text:span>when Judah went to war against the children of Ammon, Moab, and mount Seir. <text:span text:style-name="T17">The LORD caused the enemies to </text:span><text:span text:style-name="T18">slay</text:span><text:span text:style-name="T17"> </text:span><text:span text:style-name="T19">each other</text:span><text:span text:style-name="T17"> and it took Judah </text:span><text:span text:style-name="T20">three</text:span><text:span text:style-name="T17"> days to gather all the spoil.</text:span></text:p>
          </table:table-cell>
        </table:table-row>
        <table:table-row>
          <table:table-cell table:style-name="Table3.A2" office:value-type="string">
            <text:p text:style-name="P17">Psalm 29:2</text:p>
            <text:p text:style-name="P28">Give unto the LORD the glory due unto his name<text:span text:style-name="T13">; </text:span>worship the LORD in the beauty of holiness.</text:p>
          </table:table-cell>
          <table:table-cell table:style-name="Table3.B2" office:value-type="string">
            <text:p text:style-name="P29">A Psalm of David ascribing glory to God.</text:p>
          </table:table-cell>
        </table:table-row>
        <table:table-row>
          <table:table-cell table:style-name="Table3.A2" office:value-type="string">
            <text:p text:style-name="Table_20_Contents">Psalm 96:8-9</text:p>
            <text:p text:style-name="Table_20_Contents"><text:span text:style-name="T12">Give unto the LORD the glory due unto his name</text:span>: bring an offering, and come into his courts. [9] O <text:span text:style-name="T12">worship the LORD in the beauty of holiness</text:span>: fear before him, all the earth.</text:p>
          </table:table-cell>
          <table:table-cell table:style-name="Table3.B2" office:value-type="string">
            <text:p text:style-name="P30">An untitled Psalm <text:span text:style-name="T21">prais</text:span><text:span text:style-name="T22">ing</text:span><text:span text:style-name="T21"> God that ends with a prophe</text:span><text:span text:style-name="T23">tical statement</text:span><text:span text:style-name="T21"> concerning the </text:span><text:span text:style-name="T24">final judgment </text:span><text:span text:style-name="T25">(AKA Great white throne judgment)</text:span><text:span text:style-name="T26">(</text:span><text:span text:style-name="T27">John 12:48, </text:span><text:span text:style-name="T26">Rev. 20:7-15).</text:span></text:p>
          </table:table-cell>
        </table:table-row>
      </table:table>
      <text:p text:style-name="P23"/>
      <text:p text:style-name="P31">Strongs numbers referenced</text:p>
      <table:table table:name="Table4" table:style-name="Table4">
        <table:table-column table:style-name="Table4.A"/>
        <table:table-column table:style-name="Table4.B"/>
        <table:table-row>
          <table:table-cell table:style-name="Table4.A1" office:value-type="string">
            <text:p text:style-name="P32">H1927</text:p>
            <text:p text:style-name="P32">beauty</text:p>
          </table:table-cell>
          <table:table-cell table:style-name="Table4.B1" office:value-type="string">
            <text:p text:style-name="Table_20_Contents">הֲדָרָה hădârâh, had-aw-raw'; feminine of H1926; <text:span text:style-name="T28">decoration</text:span>:—beauty, honour.</text:p>
          </table:table-cell>
        </table:table-row>
        <table:table-row>
          <table:table-cell table:style-name="Table4.A2" office:value-type="string">
            <text:p text:style-name="P32">H6944</text:p>
            <text:p text:style-name="P32">holiness</text:p>
            <text:p text:style-name="P33">(the opposite of holiness is defiled, unclean, common)</text:p>
          </table:table-cell>
          <table:table-cell table:style-name="Table4.B2" office:value-type="string">
            <text:p text:style-name="Table_20_Contents">קֹדֶשׁ qôdesh, ko'-desh; from <text:span text:style-name="T29">H6942</text:span>; <text:span text:style-name="T28">a sacred place or thing</text:span>; rarely abstract, <text:span text:style-name="T28">sanctity</text:span>:—consecrated (thing), dedicated (thing), hallowed (thing), holiness, (× most) holy (× day, portion, thing), saint, sanctuary.</text:p>
          </table:table-cell>
        </table:table-row>
        <table:table-row>
          <table:table-cell table:style-name="Table4.A2" office:value-type="string">
            <text:p text:style-name="P34">H6942</text:p>
          </table:table-cell>
          <table:table-cell table:style-name="Table4.B2" office:value-type="string">
            <text:p text:style-name="Table_20_Contents">קָדַשׁ qâdash, kaw-dash'; a primitive root; <text:span text:style-name="T28">to be</text:span> (causatively, make, pronounce or observe as) <text:span text:style-name="T28">clean</text:span> (ceremonially or morally):—appoint, bid, consecrate, dedicate, defile, hallow, (be, keep) holy(-er, place), keep, prepare, proclaim, purify, sanctify(-ied one, self), × wholly.</text:p>
          </table:table-cell>
        </table:table-row>
      </table:table>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2-26T08:58:54.383297631</meta:creation-date>
    <dc:date>2026-07-11T12:21:18.275721906</dc:date>
    <meta:editing-duration>PT3H8M44S</meta:editing-duration>
    <meta:editing-cycles>63</meta:editing-cycles>
    <meta:generator>LibreOffice/26.2.4.2$Linux_X86_64 LibreOffice_project/64a984c51f4702dbd3710b13428c673a2f1292e7</meta:generator>
    <meta:document-statistic meta:table-count="5" meta:image-count="0" meta:object-count="0" meta:page-count="3" meta:paragraph-count="90" meta:word-count="1069" meta:character-count="5893" meta:non-whitespace-character-count="4918"/>
  </office:meta>
</office:document-meta>
</file>