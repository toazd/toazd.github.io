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Noto_Sans_Devanagari_1.ttf" manifest:media-type="application/x-font-ttf"/>
  <manifest:file-entry manifest:full-path="Fonts/Font_Liberation_Sans_3.ttf" manifest:media-type="application/x-font-ttf"/>
  <manifest:file-entry manifest:full-path="Fonts/Font_Noto_Sans_Devanagari_2.ttf" manifest:media-type="application/x-font-ttf"/>
  <manifest:file-entry manifest:full-path="Fonts/Font_Liberation_Sans_4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>
      <svg:font-face-src>
        <svg:font-face-uri xlink:href="Fonts/Font_Noto_Sans_Devanagari_1.ttf" xlink:type="simple" loext:font-style="normal" loext:font-weight="normal">
          <svg:font-face-format svg:string="truetype"/>
        </svg:font-face-uri>
        <svg:font-face-uri xlink:href="Fonts/Font_Noto_Sans_Devanagari_2.ttf" xlink:type="simple" loext:font-style="normal" loext:font-weight="bold">
          <svg:font-face-format svg:string="truetype"/>
        </svg:font-face-uri>
      </svg:font-face-src>
    </style:font-face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2.6333in" style:rel-column-width="21844*"/>
    </style:style>
    <style:style style:name="Table4.B" style:family="table-column">
      <style:table-column-properties style:column-width="2.6333in" style:rel-column-width="21845*"/>
    </style:style>
    <style:style style:name="Table4.C" style:family="table-column">
      <style:table-column-properties style:column-width="2.6333in" style:rel-column-width="21846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0.5pt solid #000000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3.95in" style:rel-column-width="32768*"/>
    </style:style>
    <style:style style:name="Table6.B" style:family="table-column">
      <style:table-column-properties style:column-width="3.95in" style:rel-column-width="3276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-left="none" fo:border-right="0.5pt solid #000000" fo:border-top="0.5pt solid #000000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1.975in" style:rel-column-width="16383*"/>
    </style:style>
    <style:style style:name="Table5.B" style:family="table-column">
      <style:table-column-properties style:column-width="1.975in" style:rel-column-width="16384*"/>
    </style:style>
    <style:style style:name="Table5.D" style:family="table-column">
      <style:table-column-properties style:column-width="1.975in" style:rel-column-width="16385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D1" style:family="table-cell">
      <style:table-cell-properties fo:padding="0.0382in" fo:border-left="0.5pt solid #000000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none"/>
    </style:style>
    <style:style style:name="Table5.D2" style:family="table-cell">
      <style:table-cell-properties fo:padding="0.0382in" fo:border-left="0.5pt solid #000000" fo:border-right="0.5pt solid #000000" fo:border-top="none" fo:border-bottom="none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3.95in" style:rel-column-width="32767*"/>
    </style:style>
    <style:style style:name="Table3.B" style:family="table-column">
      <style:table-column-properties style:column-width="3.9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.B7" style:family="table-cell">
      <style:table-cell-properties fo:padding="0.0382in" fo:border-left="0.5pt solid #000000" fo:border-right="0.5pt solid #000000" fo:border-top="none" fo:border-bottom="0.5pt solid #000000"/>
    </style:style>
    <style:style style:name="Table3.B8" style:family="table-cell">
      <style:table-cell-properties fo:padding="0.0382in" fo:border-left="0.5pt solid #000000" fo:border-right="0.5pt solid #000000" fo:border-top="none" fo:border-bottom="0.5pt solid #000000"/>
    </style:style>
    <style:style style:name="Table3.B9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127622" loext:opacity="100%" fo:font-weight="bold" style:font-weight-asian="bold" style:font-weight-complex="bold"/>
    </style:style>
    <style:style style:name="P2" style:family="paragraph" style:parent-style-name="Table_20_Contents">
      <style:text-properties fo:color="#127622" loext:opacity="100%"/>
    </style:style>
    <style:style style:name="P3" style:family="paragraph" style:parent-style-name="Table_20_Contents">
      <style:paragraph-properties fo:text-align="center" style:justify-single-word="false"/>
      <style:text-properties fo:color="#127622" loext:opacity="100%" officeooo:paragraph-rsid="0031962b"/>
    </style:style>
    <style:style style:name="P4" style:family="paragraph" style:parent-style-name="Table_20_Contents">
      <style:paragraph-properties fo:text-align="center" style:justify-single-word="false"/>
      <style:text-properties fo:color="#127622" loext:opacity="100%" officeooo:paragraph-rsid="00322e86"/>
    </style:style>
    <style:style style:name="P5" style:family="paragraph" style:parent-style-name="Table_20_Contents">
      <style:paragraph-properties fo:text-align="center" style:justify-single-word="false"/>
      <style:text-properties fo:color="#127622" loext:opacity="100%" officeooo:paragraph-rsid="00377311"/>
    </style:style>
    <style:style style:name="P6" style:family="paragraph" style:parent-style-name="Standard">
      <style:paragraph-properties fo:text-align="center" style:justify-single-word="false"/>
      <style:text-properties fo:color="#127622" loext:opacity="100%" officeooo:paragraph-rsid="00573944"/>
    </style:style>
    <style:style style:name="P7" style:family="paragraph" style:parent-style-name="Table_20_Contents">
      <style:text-properties fo:color="#127622" loext:opacity="100%" officeooo:paragraph-rsid="0055bfa8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officeooo:paragraph-rsid="001bdd8c"/>
    </style:style>
    <style:style style:name="P9" style:family="paragraph" style:parent-style-name="Table_20_Contents">
      <style:text-properties officeooo:rsid="001fe79e" officeooo:paragraph-rsid="001fe79e"/>
    </style:style>
    <style:style style:name="P10" style:family="paragraph" style:parent-style-name="Table_20_Contents">
      <style:text-properties officeooo:paragraph-rsid="001b6525"/>
    </style:style>
    <style:style style:name="P11" style:family="paragraph" style:parent-style-name="Table_20_Contents">
      <style:text-properties officeooo:rsid="002231fd" officeooo:paragraph-rsid="002231fd"/>
    </style:style>
    <style:style style:name="P12" style:family="paragraph" style:parent-style-name="Standard">
      <style:text-properties officeooo:rsid="002ace94" officeooo:paragraph-rsid="003c9674"/>
    </style:style>
    <style:style style:name="P13" style:family="paragraph" style:parent-style-name="Standard">
      <style:text-properties officeooo:rsid="002ace94" officeooo:paragraph-rsid="00573944"/>
    </style:style>
    <style:style style:name="P14" style:family="paragraph" style:parent-style-name="Table_20_Contents">
      <style:text-properties officeooo:rsid="002ace94" officeooo:paragraph-rsid="00573944"/>
    </style:style>
    <style:style style:name="P15" style:family="paragraph" style:parent-style-name="Standard">
      <style:paragraph-properties fo:text-align="center" style:justify-single-word="false"/>
      <style:text-properties officeooo:rsid="002e3798" officeooo:paragraph-rsid="00573944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4a691" officeooo:paragraph-rsid="0057394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4a691" officeooo:paragraph-rsid="00573944" style:font-weight-asian="bold" style:font-weight-complex="bold"/>
    </style:style>
    <style:style style:name="P18" style:family="paragraph" style:parent-style-name="Standard">
      <style:text-properties officeooo:rsid="001f3d1c"/>
    </style:style>
    <style:style style:name="P19" style:family="paragraph" style:parent-style-name="Table_20_Contents">
      <style:text-properties officeooo:paragraph-rsid="003a4b87"/>
    </style:style>
    <style:style style:name="P20" style:family="paragraph" style:parent-style-name="Standard">
      <style:paragraph-properties fo:text-align="center" style:justify-single-word="false"/>
      <style:text-properties officeooo:rsid="003b214a" officeooo:paragraph-rsid="003b214a"/>
    </style:style>
    <style:style style:name="P21" style:family="paragraph" style:parent-style-name="Standard">
      <style:text-properties officeooo:paragraph-rsid="001fe79e"/>
    </style:style>
    <style:style style:name="P22" style:family="paragraph" style:parent-style-name="Table_20_Contents">
      <style:text-properties officeooo:paragraph-rsid="001fe79e"/>
    </style:style>
    <style:style style:name="P23" style:family="paragraph" style:parent-style-name="Standard">
      <style:text-properties officeooo:rsid="00454b3d" officeooo:paragraph-rsid="00454b3d"/>
    </style:style>
    <style:style style:name="P24" style:family="paragraph" style:parent-style-name="Standard">
      <style:text-properties officeooo:rsid="00484ed7" officeooo:paragraph-rsid="00484ed7"/>
    </style:style>
    <style:style style:name="P25" style:family="paragraph" style:parent-style-name="Standard">
      <style:text-properties officeooo:paragraph-rsid="004fc6de"/>
    </style:style>
    <style:style style:name="P26" style:family="paragraph" style:parent-style-name="Standard">
      <style:text-properties officeooo:paragraph-rsid="00454b3d"/>
    </style:style>
    <style:style style:name="P27" style:family="paragraph" style:parent-style-name="Standard">
      <style:text-properties officeooo:paragraph-rsid="00484ed7"/>
    </style:style>
    <style:style style:name="P28" style:family="paragraph" style:parent-style-name="Table_20_Contents">
      <style:text-properties officeooo:rsid="0024a691" officeooo:paragraph-rsid="00573944"/>
    </style:style>
    <style:style style:name="P29" style:family="paragraph" style:parent-style-name="Table_20_Contents">
      <style:text-properties officeooo:rsid="0027f758" officeooo:paragraph-rsid="00573944"/>
    </style:style>
    <style:style style:name="P30" style:family="paragraph" style:parent-style-name="Table_20_Contents">
      <style:text-properties officeooo:rsid="002a42e7" officeooo:paragraph-rsid="00573944"/>
    </style:style>
    <style:style style:name="P31" style:family="paragraph" style:parent-style-name="Table_20_Contents">
      <style:text-properties officeooo:rsid="002b4911" officeooo:paragraph-rsid="00573944"/>
    </style:style>
    <style:style style:name="P32" style:family="paragraph" style:parent-style-name="Table_20_Contents">
      <style:text-properties officeooo:rsid="002c3d55" officeooo:paragraph-rsid="00573944"/>
    </style:style>
    <style:style style:name="P33" style:family="paragraph" style:parent-style-name="Table_20_Contents">
      <style:text-properties officeooo:rsid="002e1644" officeooo:paragraph-rsid="00573944"/>
    </style:style>
    <style:style style:name="P34" style:family="paragraph" style:parent-style-name="Table_20_Contents">
      <style:text-properties officeooo:paragraph-rsid="002ea74f"/>
    </style:style>
    <style:style style:name="P35" style:family="paragraph" style:parent-style-name="Table_20_Contents">
      <style:text-properties officeooo:paragraph-rsid="002f612a"/>
    </style:style>
    <style:style style:name="P36" style:family="paragraph" style:parent-style-name="Table_20_Contents">
      <style:text-properties officeooo:paragraph-rsid="0031962b"/>
    </style:style>
    <style:style style:name="P37" style:family="paragraph" style:parent-style-name="Table_20_Contents">
      <style:text-properties officeooo:rsid="0032b827" officeooo:paragraph-rsid="0032b827"/>
    </style:style>
    <style:style style:name="P38" style:family="paragraph" style:parent-style-name="Table_20_Contents">
      <style:text-properties officeooo:paragraph-rsid="0032b827"/>
    </style:style>
    <style:style style:name="P39" style:family="paragraph" style:parent-style-name="Table_20_Contents">
      <style:paragraph-properties fo:text-align="center" style:justify-single-word="false"/>
      <style:text-properties officeooo:rsid="001ca5d8" officeooo:paragraph-rsid="003a4b87"/>
    </style:style>
    <style:style style:name="P40" style:family="paragraph" style:parent-style-name="Table_20_Contents">
      <style:paragraph-properties fo:text-align="center" style:justify-single-word="false"/>
      <style:text-properties officeooo:rsid="004405ae" officeooo:paragraph-rsid="004405ae"/>
    </style:style>
    <style:style style:name="P41" style:family="paragraph" style:parent-style-name="Table_20_Contents">
      <style:text-properties fo:color="#c9211e" loext:opacity="100%"/>
    </style:style>
    <style:style style:name="P42" style:family="paragraph" style:parent-style-name="Table_20_Contents">
      <style:text-properties fo:color="#c9211e" loext:opacity="100%" officeooo:paragraph-rsid="0055bfa8"/>
    </style:style>
    <style:style style:name="P43" style:family="paragraph" style:parent-style-name="Table_20_Contents">
      <style:paragraph-properties fo:text-align="center" style:justify-single-word="false"/>
      <style:text-properties officeooo:rsid="004a8314" officeooo:paragraph-rsid="004b161f"/>
    </style:style>
    <style:style style:name="P44" style:family="paragraph" style:parent-style-name="Table_20_Contents">
      <style:paragraph-properties fo:text-align="center" style:justify-single-word="false"/>
      <style:text-properties officeooo:rsid="004b161f" officeooo:paragraph-rsid="004e45a6"/>
    </style:style>
    <style:style style:name="P45" style:family="paragraph" style:parent-style-name="Table_20_Contents">
      <style:paragraph-properties fo:text-align="center" style:justify-single-word="false"/>
      <style:text-properties officeooo:rsid="004d15ba" officeooo:paragraph-rsid="004e45a6"/>
    </style:style>
    <style:style style:name="P46" style:family="paragraph" style:parent-style-name="Table_20_Contents">
      <style:paragraph-properties fo:text-align="center" style:justify-single-word="false"/>
      <style:text-properties officeooo:paragraph-rsid="002231fd"/>
    </style:style>
    <style:style style:name="P47" style:family="paragraph" style:parent-style-name="Standard">
      <style:text-properties officeooo:paragraph-rsid="00573944"/>
    </style:style>
    <style:style style:name="P48" style:family="paragraph" style:parent-style-name="Standard" style:list-style-name="L1">
      <style:text-properties officeooo:rsid="00484ed7" officeooo:paragraph-rsid="004fc6de"/>
    </style:style>
    <style:style style:name="P49" style:family="paragraph" style:parent-style-name="Standard">
      <style:text-properties officeooo:rsid="001f3d1c" officeooo:paragraph-rsid="00573944"/>
    </style:style>
    <style:style style:name="P50" style:family="paragraph" style:parent-style-name="Standard">
      <style:text-properties officeooo:rsid="00249e05" officeooo:paragraph-rsid="00573944"/>
    </style:style>
    <style:style style:name="P51" style:family="paragraph" style:parent-style-name="Standard">
      <style:text-properties officeooo:rsid="00587230" officeooo:paragraph-rsid="00587230"/>
    </style:style>
    <style:style style:name="P52" style:family="paragraph" style:parent-style-name="Standard">
      <style:paragraph-properties fo:text-align="center" style:justify-single-word="false"/>
      <style:text-properties officeooo:rsid="00597ef4" officeooo:paragraph-rsid="00597ef4"/>
    </style:style>
    <style:style style:name="P53" style:family="paragraph" style:parent-style-name="Table_20_Contents">
      <style:paragraph-properties fo:text-align="center" style:justify-single-word="false"/>
      <style:text-properties officeooo:rsid="004a8314" officeooo:paragraph-rsid="00587230"/>
    </style:style>
    <style:style style:name="P54" style:family="paragraph" style:parent-style-name="Table_20_Contents">
      <style:paragraph-properties fo:text-align="center" style:justify-single-word="false"/>
      <style:text-properties officeooo:rsid="004b161f" officeooo:paragraph-rsid="00587230"/>
    </style:style>
    <style:style style:name="P55" style:family="paragraph" style:parent-style-name="Table_20_Contents">
      <style:paragraph-properties fo:text-align="center" style:justify-single-word="false"/>
      <style:text-properties officeooo:rsid="004405ae" officeooo:paragraph-rsid="00587230"/>
    </style:style>
    <style:style style:name="P56" style:family="paragraph" style:parent-style-name="Table_20_Contents">
      <style:paragraph-properties fo:text-align="center" style:justify-single-word="false"/>
      <style:text-properties officeooo:rsid="001ca5d8" officeooo:paragraph-rsid="00587230"/>
    </style:style>
    <style:style style:name="P57" style:family="paragraph" style:parent-style-name="Table_20_Contents">
      <style:paragraph-properties fo:text-align="center" style:justify-single-word="false"/>
      <style:text-properties officeooo:rsid="004d15ba" officeooo:paragraph-rsid="00587230"/>
    </style:style>
    <style:style style:name="P58" style:family="paragraph" style:parent-style-name="Table_20_Contents">
      <style:text-properties officeooo:paragraph-rsid="00587230"/>
    </style:style>
    <style:style style:name="T1" style:family="text">
      <style:text-properties fo:color="#127622" loext:opacity="100%"/>
    </style:style>
    <style:style style:name="T2" style:family="text">
      <style:text-properties fo:color="#127622" loext:opacity="100%" officeooo:rsid="001bdd8c"/>
    </style:style>
    <style:style style:name="T3" style:family="text">
      <style:text-properties officeooo:rsid="001bdd8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text-underline-style="none" officeooo:rsid="001ca5d8"/>
    </style:style>
    <style:style style:name="T7" style:family="text">
      <style:text-properties style:text-position="super 58%" style:text-underline-style="none" officeooo:rsid="004405ae"/>
    </style:style>
    <style:style style:name="T8" style:family="text">
      <style:text-properties style:text-position="super 58%" officeooo:rsid="004a8314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32b827" fo:background-color="#ffff00" loext:char-shading-value="0"/>
    </style:style>
    <style:style style:name="T11" style:family="text">
      <style:text-properties officeooo:rsid="001fe79e" fo:background-color="#ffff00" loext:char-shading-value="0"/>
    </style:style>
    <style:style style:name="T12" style:family="text">
      <style:text-properties officeooo:rsid="0027f758"/>
    </style:style>
    <style:style style:name="T13" style:family="text">
      <style:text-properties officeooo:rsid="0028d12e"/>
    </style:style>
    <style:style style:name="T14" style:family="text">
      <style:text-properties officeooo:rsid="002a42e7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2ace94"/>
    </style:style>
    <style:style style:name="T17" style:family="text">
      <style:text-properties officeooo:rsid="0031962b"/>
    </style:style>
    <style:style style:name="T18" style:family="text">
      <style:text-properties officeooo:rsid="0032b827"/>
    </style:style>
    <style:style style:name="T19" style:family="text">
      <style:text-properties officeooo:rsid="00344a60"/>
    </style:style>
    <style:style style:name="T20" style:family="text">
      <style:text-properties officeooo:rsid="003638f4"/>
    </style:style>
    <style:style style:name="T21" style:family="text">
      <style:text-properties officeooo:rsid="00385a4b"/>
    </style:style>
    <style:style style:name="T22" style:family="text">
      <style:text-properties fo:background-color="#ffbf00" loext:char-shading-value="0"/>
    </style:style>
    <style:style style:name="T23" style:family="text">
      <style:text-properties officeooo:rsid="0032b827" fo:background-color="#ffbf00" loext:char-shading-value="0"/>
    </style:style>
    <style:style style:name="T24" style:family="text">
      <style:text-properties fo:background-color="#ffe994" loext:char-shading-value="0"/>
    </style:style>
    <style:style style:name="T25" style:family="text">
      <style:text-properties officeooo:rsid="0032b827" fo:background-color="#ffe994" loext:char-shading-value="0"/>
    </style:style>
    <style:style style:name="T26" style:family="text">
      <style:text-properties officeooo:rsid="003c8b58"/>
    </style:style>
    <style:style style:name="T27" style:family="text">
      <style:text-properties officeooo:rsid="001fe79e"/>
    </style:style>
    <style:style style:name="T28" style:family="text">
      <style:text-properties officeooo:rsid="0040009d"/>
    </style:style>
    <style:style style:name="T29" style:family="text">
      <style:text-properties officeooo:rsid="0041ee0c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454b3d"/>
    </style:style>
    <style:style style:name="T32" style:family="text">
      <style:text-properties officeooo:rsid="00468d0c"/>
    </style:style>
    <style:style style:name="T33" style:family="text">
      <style:text-properties officeooo:rsid="00484ed7"/>
    </style:style>
    <style:style style:name="T34" style:family="text">
      <style:text-properties officeooo:rsid="0049fb45"/>
    </style:style>
    <style:style style:name="T35" style:family="text">
      <style:text-properties officeooo:rsid="002231fd"/>
    </style:style>
    <style:style style:name="T36" style:family="text">
      <style:text-properties style:use-window-font-color="true" loext:opacity="0%"/>
    </style:style>
    <style:style style:name="T37" style:family="text">
      <style:text-properties officeooo:rsid="005203d2"/>
    </style:style>
    <style:style style:name="T38" style:family="text">
      <style:text-properties officeooo:rsid="00530f98"/>
    </style:style>
    <style:style style:name="T39" style:family="text">
      <style:text-properties officeooo:rsid="005507e2"/>
    </style:style>
    <style:style style:name="T40" style:family="text">
      <style:text-properties officeooo:rsid="0055d0b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alm 100:4</text:p>
      <text:p text:style-name="Standard">Enter into his gates with thanksgiving, and into his courts with praise: be thankful unto him, and bless his name.</text:p>
      <text:p text:style-name="Standard"/>
      <text:p text:style-name="P8">¶ A Psalm<text:span text:style-name="T8">H4210</text:span> of prais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Psalm 100:1-5</text:p>
            <text:p text:style-name="P10"><text:span text:style-name="T3">[</text:span><text:span text:style-name="T2">1</text:span><text:span text:style-name="T3">] </text:span>Make a joyful noise unto the LORD, all <text:span text:style-name="T4">ye lands</text:span><text:span text:style-name="T7">H776</text:span>.</text:p>
            <text:p text:style-name="P10">[<text:span text:style-name="T1">2</text:span>] Serve the LORD with gladness: come before his presence with singing.</text:p>
            <text:p text:style-name="P10">[<text:span text:style-name="T1">3</text:span>] Know ye that the LORD he is God: it is he that hath made us, and not we ourselves; we are his people, and the sheep of his pasture.</text:p>
            <text:p text:style-name="P10">[<text:span text:style-name="T1">4</text:span>] Enter <text:span text:style-name="T4">into his gates</text:span><text:span text:style-name="T6">H8179</text:span> <text:span text:style-name="T30">with thanksgiving</text:span>, and <text:span text:style-name="T4">into his courts</text:span><text:span text:style-name="T6">H2691</text:span> <text:span text:style-name="T30">with praise</text:span>: be thankful unto him, and bless his name.</text:p>
            <text:p text:style-name="P10">[<text:span text:style-name="T1">5</text:span>] For the LORD is good; his mercy is everlasting; and his truth endureth to all generations.</text:p>
          </table:table-cell>
        </table:table-row>
      </table:table>
      <text:p text:style-name="P21"/>
      <text:p text:style-name="P25"><text:span text:style-name="T1">Psalm 100</text:span><text:span text:style-name="T33"> has the following </text:span><text:span text:style-name="T34">poetic </text:span><text:span text:style-name="T33">format </text:span><text:span text:style-name="T34">(rhythmic structure) which is not uncommon in Hebrew (the entire old testament)</text:span><text:span text:style-name="T33">:</text:span></text:p>
      <text:list text:style-name="L1">
        <text:list-item>
          <text:p text:style-name="P48">Praise</text:p>
        </text:list-item>
        <text:list-item>
          <text:p text:style-name="P48">Reasons to praise</text:p>
        </text:list-item>
        <text:list-item>
          <text:p text:style-name="P48">Praise</text:p>
        </text:list-item>
        <text:list-item>
          <text:p text:style-name="P48">Reasons to praise</text:p>
        </text:list-item>
      </text:list>
      <text:p text:style-name="P21"/>
      <text:p text:style-name="P21"><text:span text:style-name="T1">Psalm 100:1-4</text:span><text:span text:style-name="T27"> not only encourages us to praise the LORD </text:span><text:span text:style-name="T39">but also</text:span><text:span text:style-name="T27"> </text:span><text:span text:style-name="T39">gives us reasons to praise the LORD and</text:span><text:span text:style-name="T27"> also tells us </text:span><text:span text:style-name="T39">ways that we can do so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6"><text:span text:style-name="T35">v</text:span><text:span text:style-name="T1">1,2b</text:span></text:p>
          </table:table-cell>
          <table:table-cell table:style-name="Table4.B1" office:value-type="string">
            <text:p text:style-name="P9">Make a <text:span text:style-name="T9">joyful noise</text:span></text:p>
          </table:table-cell>
          <table:table-cell table:style-name="Table4.C1" office:value-type="string">
            <text:p text:style-name="P9">With <text:span text:style-name="T9">singing</text:span></text:p>
          </table:table-cell>
        </table:table-row>
        <table:table-row>
          <table:table-cell table:style-name="Table4.A2" office:value-type="string">
            <text:p text:style-name="P46"><text:span text:style-name="T35">v</text:span><text:span text:style-name="T1">2a</text:span></text:p>
          </table:table-cell>
          <table:table-cell table:style-name="Table4.B2" office:value-type="string">
            <text:p text:style-name="P9"><text:span text:style-name="T9">Serve</text:span> the LORD with <text:span text:style-name="T9">gladness</text:span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6"><text:span text:style-name="T35">v</text:span><text:span text:style-name="T1">4a</text:span><text:span text:style-name="T35">,</text:span><text:span text:style-name="T1">4b</text:span></text:p>
          </table:table-cell>
          <table:table-cell table:style-name="Table4.B2" office:value-type="string">
            <text:p text:style-name="P9">With <text:span text:style-name="T9">thanksgiving</text:span></text:p>
          </table:table-cell>
          <table:table-cell table:style-name="Table4.C2" office:value-type="string">
            <text:p text:style-name="P9">With <text:span text:style-name="T9">praise</text:span></text:p>
          </table:table-cell>
        </table:table-row>
        <table:table-row>
          <table:table-cell table:style-name="Table4.A2" office:value-type="string">
            <text:p text:style-name="P46"><text:span text:style-name="T36">v</text:span><text:span text:style-name="T1">4c</text:span><text:span text:style-name="T35">,</text:span><text:span text:style-name="T1">4d</text:span></text:p>
          </table:table-cell>
          <table:table-cell table:style-name="Table4.B2" office:value-type="string">
            <text:p text:style-name="P11">Be thankful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46"><text:span text:style-name="T35">v</text:span><text:span text:style-name="T1">4d</text:span></text:p>
          </table:table-cell>
          <table:table-cell table:style-name="Table4.B5" office:value-type="string">
            <text:p text:style-name="P9">Bless His name (<text:span text:style-name="T9">speak</text:span> good of Him)</text:p>
          </table:table-cell>
          <table:table-cell table:style-name="Table4.C5" office:value-type="string">
            <text:p text:style-name="P22"><text:span text:style-name="T27">To curse someones name </text:span><text:span text:style-name="T28">(</text:span><text:span text:style-name="T29">which is </text:span><text:span text:style-name="T28">the opposite of blessing someones name) </text:span><text:span text:style-name="T27">is to </text:span><text:span text:style-name="T11">speak</text:span><text:span text:style-name="T27"> evil of them </text:span><text:span text:style-name="T37">(</text:span><text:span text:style-name="T1">Mal. 2:2</text:span><text:span text:style-name="T37">, </text:span><text:span text:style-name="T1">Exo. 22:28</text:span><text:span text:style-name="T37">, </text:span><text:span text:style-name="T1">Rom. 12:14</text:span><text:span text:style-name="T37">, </text:span><text:span text:style-name="T1">Matt. 26:74</text:span><text:span text:style-name="T37">, </text:span><text:span text:style-name="T1">I Kings 2:8</text:span><text:span text:style-name="T38">, </text:span><text:span text:style-name="T1">Neh. 10:29</text:span><text:span text:style-name="T38">)</text:span></text:p>
          </table:table-cell>
        </table:table-row>
      </table:table>
      <text:p text:style-name="P18"/>
      <text:p text:style-name="P26"><text:span text:style-name="T1">Psalm 100:3</text:span><text:span text:style-name="T31"> reminds of at least one way that we can be thankful: it reminds us that God is our creator and likens us to the sheep of His pasture. Like a good shepherd, He provides all that we need </text:span><text:span text:style-name="T32">and mor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John 10:11</text:p>
            <text:p text:style-name="P41">I am the good shepherd: the good shepherd giveth his life for the sheep.</text:p>
          </table:table-cell>
          <table:table-cell table:style-name="Table6.B1" office:value-type="string">
            <text:p text:style-name="P7">John 10:14</text:p>
            <text:p text:style-name="P42">I am the good shepherd, and know my sheep, and am known of mine.</text:p>
          </table:table-cell>
        </table:table-row>
      </table:table>
      <text:p text:style-name="P23"/>
      <text:p text:style-name="P27"><text:span text:style-name="T1">Psalm 100:5</text:span><text:span text:style-name="T33"> gives us more reasons to be thankful: God is good </text:span><text:span text:style-name="T40">and</text:span><text:span text:style-name="T33"> His mercy and truth endures forever (</text:span><text:span text:style-name="T1">Ps. 136:1</text:span><text:span text:style-name="T33">)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"><text:span text:style-name="T15"/></text:p>
      <text:p text:style-name="P20"><text:soft-page-break/>There are many parallels between different psalms. <text:span text:style-name="T26">Here is a small sample.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3">Psalm 95</text:p>
          </table:table-cell>
          <table:table-cell table:style-name="Table5.A1" office:value-type="string">
            <text:p text:style-name="P4">Psalm 96</text:p>
          </table:table-cell>
          <table:table-cell table:style-name="Table5.A1" office:value-type="string">
            <text:p text:style-name="P5">Psalm 98</text:p>
          </table:table-cell>
          <table:table-cell table:style-name="Table5.D1" office:value-type="string">
            <text:p text:style-name="P3">Psalm 100</text:p>
          </table:table-cell>
        </table:table-row>
        <table:table-row>
          <table:table-cell table:style-name="Table5.A2" office:value-type="string">
            <text:p text:style-name="P36"><text:span text:style-name="T17">[</text:span><text:span text:style-name="T1">1</text:span><text:span text:style-name="T17">] </text:span>O come, <text:span text:style-name="T9">let us sing unto the</text:span><text:span text:style-name="T22"> LORD</text:span>: let us <text:span text:style-name="T9">make a joyful noise</text:span> to the <text:span text:style-name="T22">rock of our salvation</text:span>.</text:p>
          </table:table-cell>
          <table:table-cell table:style-name="Table5.A2" office:value-type="string">
            <text:p text:style-name="P38"><text:span text:style-name="T18">[</text:span><text:span text:style-name="T1">1</text:span><text:span text:style-name="T18">] O </text:span><text:span text:style-name="T10">sing unto the LORD</text:span><text:span text:style-name="T18"> a new song: sing unto the LORD, all the earth. [</text:span><text:span text:style-name="T1">2a</text:span><text:span text:style-name="T18">] Sing unto the LORD,</text:span></text:p>
          </table:table-cell>
          <table:table-cell table:style-name="Table5.A2" office:value-type="string">
            <text:p text:style-name="P38"><text:span text:style-name="T21">[</text:span><text:span text:style-name="T1">4</text:span><text:span text:style-name="T21">] </text:span><text:span text:style-name="T10">Make a joyful noise unto the LORD</text:span><text:span text:style-name="T18">, all the earth: </text:span><text:span text:style-name="T10">make a loud noise</text:span><text:span text:style-name="T18">, and rejoice, and </text:span><text:span text:style-name="T10">sing praise</text:span><text:span text:style-name="T18">. [</text:span><text:span text:style-name="T1">5</text:span><text:span text:style-name="T18">] Sing unto the LORD with the harp; with the harp, and the voice of a psalm. [</text:span><text:span text:style-name="T1">6</text:span><text:span text:style-name="T18">] With trumpets and sound of cornet </text:span><text:span text:style-name="T10">make a joyful noise before the </text:span><text:span text:style-name="T23">LORD</text:span><text:span text:style-name="T18">, the </text:span><text:span text:style-name="T23">King</text:span><text:span text:style-name="T18">.</text:span></text:p>
          </table:table-cell>
          <table:table-cell table:style-name="Table5.D2" office:value-type="string">
            <text:p text:style-name="P36"><text:span text:style-name="T17">[</text:span><text:span text:style-name="T1">1</text:span><text:span text:style-name="T17">] </text:span><text:span text:style-name="T9">Make a joyful noise unto the LORD</text:span>, all ye lands.</text:p>
          </table:table-cell>
        </table:table-row>
        <table:table-row>
          <table:table-cell table:style-name="Table5.A3" office:value-type="string">
            <text:p text:style-name="P34"/>
          </table:table-cell>
          <table:table-cell table:style-name="Table5.A3" office:value-type="string">
            <text:p text:style-name="P34"/>
          </table:table-cell>
          <table:table-cell table:style-name="Table5.A3" office:value-type="string">
            <text:p text:style-name="P34"/>
          </table:table-cell>
          <table:table-cell table:style-name="Table5.D3" office:value-type="string">
            <text:p text:style-name="P34">[<text:span text:style-name="T1">2</text:span>] Serve the LORD with gladness: come before his presence with singing.</text:p>
          </table:table-cell>
        </table:table-row>
        <table:table-row>
          <table:table-cell table:style-name="Table5.A3" office:value-type="string">
            <text:p text:style-name="P34">[<text:span text:style-name="T1">2</text:span>] <text:span text:style-name="T22">Let us come before his presence with thanksgiving</text:span>, and <text:span text:style-name="T9">make a joyful noise unto him with psalms</text:span>.</text:p>
          </table:table-cell>
          <table:table-cell table:style-name="Table5.A3" office:value-type="string">
            <text:p text:style-name="P38"><text:span text:style-name="T18">[</text:span><text:span text:style-name="T1">2b</text:span><text:span text:style-name="T18">,</text:span><text:span text:style-name="T1">2c</text:span><text:span text:style-name="T18">] </text:span><text:span text:style-name="T10">bless his name</text:span><text:span text:style-name="T18">; shew forth his salvation from day to day. </text:span><text:span text:style-name="T20">[</text:span><text:span text:style-name="T1">3</text:span><text:span text:style-name="T20">] </text:span><text:span text:style-name="T25">Declare his glory</text:span><text:span text:style-name="T18"> among the heathen, his wonders </text:span><text:span text:style-name="T25">among all people</text:span><text:span text:style-name="T18">.</text:span></text:p>
          </table:table-cell>
          <table:table-cell table:style-name="Table5.A3" office:value-type="string">
            <text:p text:style-name="P37"/>
          </table:table-cell>
          <table:table-cell table:style-name="Table5.D3" office:value-type="string">
            <text:p text:style-name="P35">[<text:span text:style-name="T1">4</text:span>] <text:span text:style-name="T22">Enter into his gates with thanksgiving</text:span>, and into his courts <text:span text:style-name="T22">with praise</text:span>: be thankful unto him, and <text:span text:style-name="T9">bless his name</text:span>.</text:p>
          </table:table-cell>
        </table:table-row>
        <table:table-row>
          <table:table-cell table:style-name="Table5.A3" office:value-type="string">
            <text:p text:style-name="P34">[<text:span text:style-name="T1">3</text:span>] For the <text:span text:style-name="T24">LORD</text:span> is a great <text:span text:style-name="T24">God</text:span>, and a great <text:span text:style-name="T24">King</text:span> above all gods.</text:p>
          </table:table-cell>
          <table:table-cell table:style-name="Table5.A3" office:value-type="string">
            <text:p text:style-name="P34"><text:span text:style-name="T19">[</text:span><text:span text:style-name="T1">4</text:span><text:span text:style-name="T19">] </text:span>For the LORD is great, and greatly to be praised: he is to be feared above all gods.</text:p>
          </table:table-cell>
          <table:table-cell table:style-name="Table5.A3" office:value-type="string">
            <text:p text:style-name="P34"/>
          </table:table-cell>
          <table:table-cell table:style-name="Table5.D3" office:value-type="string">
            <text:p text:style-name="P35">[<text:span text:style-name="T1">5</text:span>] For the LORD is good; his mercy is everlasting; and his truth endureth to all generations.</text:p>
          </table:table-cell>
        </table:table-row>
        <table:table-row>
          <table:table-cell table:style-name="Table5.A3" office:value-type="string">
            <text:p text:style-name="P34">[<text:span text:style-name="T1">7a</text:span><text:span text:style-name="T21">-</text:span><text:span text:style-name="T1">7c</text:span>] For he is our God; and <text:span text:style-name="T24">we are the people of his pasture</text:span>, and the sheep of his hand.</text:p>
          </table:table-cell>
          <table:table-cell table:style-name="Table5.A3" office:value-type="string">
            <text:p text:style-name="P34"/>
          </table:table-cell>
          <table:table-cell table:style-name="Table5.A3" office:value-type="string">
            <text:p text:style-name="P34"/>
          </table:table-cell>
          <table:table-cell table:style-name="Table5.D3" office:value-type="string">
            <text:p text:style-name="P34">[<text:span text:style-name="T1">3</text:span>] Know ye that the LORD he is God: <text:span text:style-name="T24">it is he that hath made us</text:span>, and not we ourselves; we are his people, and the sheep of his pasture.</text:p>
          </table:table-cell>
        </table:table-row>
      </table:table>
      <text:p text:style-name="P18"/>
      <text:p text:style-name="P52"><text:span text:style-name="T15">Strong's definition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H4210</text:p>
            <text:p text:style-name="P54">Psalm</text:p>
          </table:table-cell>
          <table:table-cell table:style-name="Table2.B1" office:value-type="string">
            <text:p text:style-name="P58">מִזְמוֹר mizmôwr, miz-more'; from H2167; properly, instrumental music; by implication, <text:span text:style-name="T9">a poem set to notes</text:span></text:p>
          </table:table-cell>
        </table:table-row>
        <table:table-row>
          <table:table-cell table:style-name="Table2.A2" office:value-type="string">
            <text:p text:style-name="P55">H776</text:p>
            <text:p text:style-name="P54">Ye lands</text:p>
          </table:table-cell>
          <table:table-cell table:style-name="Table2.B2" office:value-type="string">
            <text:p text:style-name="P58">אֶרֶץ ʼerets, eh'-rets; from an unused root probably meaning to be firm; <text:span text:style-name="T9">the earth</text:span> (at large, or partitively a land)</text:p>
          </table:table-cell>
        </table:table-row>
        <table:table-row>
          <table:table-cell table:style-name="Table2.A2" office:value-type="string">
            <text:p text:style-name="P56">H8179</text:p>
            <text:p text:style-name="P54">Into his gates</text:p>
          </table:table-cell>
          <table:table-cell table:style-name="Table2.B3" office:value-type="string">
            <text:p text:style-name="P58">שַׁעַר shaʻar, shah'-ar; from H8176 in its original sense; an opening, i.e. <text:span text:style-name="T9">door or gate</text:span></text:p>
          </table:table-cell>
        </table:table-row>
        <table:table-row>
          <table:table-cell table:style-name="Table2.A2" office:value-type="string">
            <text:p text:style-name="P56">H2691</text:p>
            <text:p text:style-name="P57">Into his courts</text:p>
          </table:table-cell>
          <table:table-cell table:style-name="Table2.B4" office:value-type="string">
            <text:p text:style-name="P58">חָצֵר châtsêr, khaw-tsare'; (masculine and feminine); from H2690 in its original sense; <text:span text:style-name="T9">a yard (as inclosed by a fence)</text:span>; also a hamlet (as similarly surrounded with walls)</text:p>
          </table:table-cell>
        </table:table-row>
      </table:table>
      <text:p text:style-name="P51"><text:soft-page-break/>Extra</text:p>
      <text:p text:style-name="P51"/>
      <text:p text:style-name="P50">The book of Psalms is “divided” into five “sections” <text:span text:style-name="T16">with subordinate sections within each primary section</text:span>. <text:span text:style-name="T13">The book of Psalms is not only a book of songs </text:span><text:span text:style-name="T14">and poems </text:span><text:span text:style-name="T13">but also a book of prayers.</text:span></text:p>
      <text:p text:style-name="P47"/>
      <text:p text:style-name="P15">Book of Psalms summary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Chapters</text:p>
          </table:table-cell>
          <table:table-cell table:style-name="Table3.B1" office:value-type="string">
            <text:p text:style-name="P17">Theme</text:p>
          </table:table-cell>
        </table:table-row>
        <table:table-row>
          <table:table-cell table:style-name="Table3.A2" table:number-rows-spanned="2" office:value-type="string">
            <text:p text:style-name="P6">Psalm (1,2)-41</text:p>
          </table:table-cell>
          <table:table-cell table:style-name="Table3.B2" office:value-type="string">
            <text:p text:style-name="P28">(1,2) <text:span text:style-name="T12">Introduction (anonymous author)</text:span></text:p>
            <text:p text:style-name="P29">1. Psalm of two ways (righteous vs ungodly)</text:p>
            <text:p text:style-name="P29">2. Psalm of the King (Jesus)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28">3-41 The foundation of covenant faithfulness</text:p>
          </table:table-cell>
        </table:table-row>
        <table:table-row>
          <table:table-cell table:style-name="Table3.A2" table:number-rows-spanned="3" office:value-type="string">
            <text:p text:style-name="P6">Psalm 42-72</text:p>
          </table:table-cell>
          <table:table-cell table:style-name="Table3.B2" office:value-type="string">
            <text:p text:style-name="P31">(42,43) Two poems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30">Hope <text:span text:style-name="T16">for the Messianic Kingdom</text:span>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31">(72) Poem that corresponds with the first two</text:p>
          </table:table-cell>
        </table:table-row>
        <table:table-row>
          <table:table-cell table:style-name="Table3.A2" table:number-rows-spanned="2" office:value-type="string">
            <text:p text:style-name="P6">Psalm 73-89</text:p>
          </table:table-cell>
          <table:table-cell table:style-name="Table3.B2" office:value-type="string">
            <text:p text:style-name="P14">Hope for the Messiah after exile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31">(89) Poem reflecting on God’s promise to David in light of Israel’s exile</text:p>
          </table:table-cell>
        </table:table-row>
        <table:table-row>
          <table:table-cell table:style-name="Table3.A2" table:number-rows-spanned="2" office:value-type="string">
            <text:p text:style-name="P6">Psalm 90-106</text:p>
          </table:table-cell>
          <table:table-cell table:style-name="Table3.B2" office:value-type="string">
            <text:p text:style-name="P33">(90) A prayer of Moses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32">The God of Israel as the King of all creation</text:p>
          </table:table-cell>
        </table:table-row>
        <table:table-row>
          <table:table-cell table:style-name="Table3.A2" office:value-type="string">
            <text:p text:style-name="P6">Psalm 107-150</text:p>
          </table:table-cell>
          <table:table-cell table:style-name="Table3.B2" office:value-type="string">
            <text:p text:style-name="P33">Songs of ascent and poems of praise</text:p>
          </table:table-cell>
        </table:table-row>
      </table:table>
      <text:p text:style-name="P13"><text:span text:style-name="T5">1</text:span><text:span text:style-name="T15">https://bibleproject.com/guides/book-of-psalms/</text:span></text:p>
      <text:p text:style-name="P13"><text:span text:style-name="T15"/>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5T13:22:11.245474492</meta:creation-date>
    <meta:editing-cycles>61</meta:editing-cycles>
    <meta:editing-duration>PT2H52M15S</meta:editing-duration>
    <dc:date>2023-11-28T10:10:50.483000000</dc:date>
    <meta:generator>LibreOffice/7.6.2.1$Windows_X86_64 LibreOffice_project/56f7684011345957bbf33a7ee678afaf4d2ba333</meta:generator>
    <meta:document-statistic meta:table-count="6" meta:image-count="0" meta:object-count="0" meta:page-count="3" meta:paragraph-count="88" meta:word-count="863" meta:character-count="4621" meta:non-whitespace-character-count="3850"/>
  </office:meta>
</office:document-meta>
</file>