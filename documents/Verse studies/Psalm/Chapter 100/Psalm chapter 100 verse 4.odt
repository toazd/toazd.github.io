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2.6333in" style:rel-column-width="21844*"/>
    </style:style>
    <style:style style:name="Table4.B" style:family="table-column">
      <style:table-column-properties style:column-width="2.6333in" style:rel-column-width="21845*"/>
    </style:style>
    <style:style style:name="Table4.C" style:family="table-column">
      <style:table-column-properties style:column-width="2.6333in" style:rel-column-width="21846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0.5pt solid #000000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3.95in" style:rel-column-width="32768*"/>
    </style:style>
    <style:style style:name="Table6.B" style:family="table-column">
      <style:table-column-properties style:column-width="3.95in" style:rel-column-width="3276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-left="none" fo:border-right="0.5pt solid #000000" fo:border-top="0.5pt solid #000000" fo:border-bottom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1.975in" style:rel-column-width="16383*"/>
    </style:style>
    <style:style style:name="Table5.B" style:family="table-column">
      <style:table-column-properties style:column-width="1.975in" style:rel-column-width="16384*"/>
    </style:style>
    <style:style style:name="Table5.D" style:family="table-column">
      <style:table-column-properties style:column-width="1.975in" style:rel-column-width="16385*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D1" style:family="table-cell">
      <style:table-cell-properties fo:padding="0.0382in" fo:border-left="0.5pt solid #000000" fo:border-right="0.5pt solid #000000" fo:border-top="0.5pt solid #000000" fo:border-bottom="none"/>
    </style:style>
    <style:style style:name="Table5.A2" style:family="table-cell">
      <style:table-cell-properties fo:padding="0.0382in" fo:border-left="0.5pt solid #000000" fo:border-right="none" fo:border-top="none" fo:border-bottom="none"/>
    </style:style>
    <style:style style:name="Table5.D2" style:family="table-cell">
      <style:table-cell-properties fo:padding="0.0382in" fo:border-left="0.5pt solid #000000" fo:border-right="0.5pt solid #000000" fo:border-top="none" fo:border-bottom="none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D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95in" style:rel-column-width="32767*"/>
    </style:style>
    <style:style style:name="Table2.B" style:family="table-column">
      <style:table-column-properties style:column-width="3.95in" style:rel-column-width="32768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3.95in" style:rel-column-width="32767*"/>
    </style:style>
    <style:style style:name="Table3.B" style:family="table-column">
      <style:table-column-properties style:column-width="3.9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3.B6" style:family="table-cell">
      <style:table-cell-properties fo:padding="0.0382in" fo:border-left="0.5pt solid #000000" fo:border-right="0.5pt solid #000000" fo:border-top="none" fo:border-bottom="0.5pt solid #000000"/>
    </style:style>
    <style:style style:name="Table3.B7" style:family="table-cell">
      <style:table-cell-properties fo:padding="0.0382in" fo:border-left="0.5pt solid #000000" fo:border-right="0.5pt solid #000000" fo:border-top="none" fo:border-bottom="0.5pt solid #000000"/>
    </style:style>
    <style:style style:name="Table3.B8" style:family="table-cell">
      <style:table-cell-properties fo:padding="0.0382in" fo:border-left="0.5pt solid #000000" fo:border-right="0.5pt solid #000000" fo:border-top="none" fo:border-bottom="0.5pt solid #000000"/>
    </style:style>
    <style:style style:name="Table3.B9" style:family="table-cell">
      <style:table-cell-properties fo:padding="0.0382in" fo:border-left="0.5pt solid #000000" fo:border-right="0.5pt solid #000000" fo:border-top="none" fo:border-bottom="0.5pt solid #000000"/>
    </style:style>
    <style:style style:name="Table3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3.B11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127622" loext:opacity="100%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officeooo:paragraph-rsid="001bdd8c"/>
    </style:style>
    <style:style style:name="P3" style:family="paragraph" style:parent-style-name="Table_20_Contents">
      <style:text-properties fo:color="#127622" loext:opacity="100%"/>
    </style:style>
    <style:style style:name="P4" style:family="paragraph" style:parent-style-name="Table_20_Contents">
      <style:text-properties officeooo:paragraph-rsid="001b6525"/>
    </style:style>
    <style:style style:name="P5" style:family="paragraph" style:parent-style-name="Standard">
      <style:text-properties officeooo:paragraph-rsid="001fe79e"/>
    </style:style>
    <style:style style:name="P6" style:family="paragraph" style:parent-style-name="Standard">
      <style:text-properties officeooo:paragraph-rsid="004fc6de"/>
    </style:style>
    <style:style style:name="P7" style:family="paragraph" style:parent-style-name="Standard" style:list-style-name="L1">
      <style:text-properties officeooo:rsid="00484ed7" officeooo:paragraph-rsid="004fc6de"/>
    </style:style>
    <style:style style:name="P8" style:family="paragraph" style:parent-style-name="Table_20_Contents">
      <style:paragraph-properties fo:text-align="center" style:justify-single-word="false"/>
      <style:text-properties officeooo:paragraph-rsid="002231fd"/>
    </style:style>
    <style:style style:name="P9" style:family="paragraph" style:parent-style-name="Table_20_Contents">
      <style:text-properties officeooo:rsid="001fe79e" officeooo:paragraph-rsid="001fe79e"/>
    </style:style>
    <style:style style:name="P10" style:family="paragraph" style:parent-style-name="Table_20_Contents">
      <style:text-properties officeooo:rsid="002231fd" officeooo:paragraph-rsid="002231fd"/>
    </style:style>
    <style:style style:name="P11" style:family="paragraph" style:parent-style-name="Table_20_Contents">
      <style:text-properties officeooo:paragraph-rsid="001fe79e"/>
    </style:style>
    <style:style style:name="P12" style:family="paragraph" style:parent-style-name="Standard">
      <style:text-properties officeooo:rsid="001f3d1c"/>
    </style:style>
    <style:style style:name="P13" style:family="paragraph" style:parent-style-name="Standard">
      <style:text-properties officeooo:paragraph-rsid="00454b3d"/>
    </style:style>
    <style:style style:name="P14" style:family="paragraph" style:parent-style-name="Table_20_Contents">
      <style:text-properties fo:color="#c9211e" loext:opacity="100%"/>
    </style:style>
    <style:style style:name="P15" style:family="paragraph" style:parent-style-name="Table_20_Contents">
      <style:text-properties fo:color="#127622" loext:opacity="100%" officeooo:paragraph-rsid="0055bfa8"/>
    </style:style>
    <style:style style:name="P16" style:family="paragraph" style:parent-style-name="Table_20_Contents">
      <style:text-properties fo:color="#c9211e" loext:opacity="100%" officeooo:paragraph-rsid="0055bfa8"/>
    </style:style>
    <style:style style:name="P17" style:family="paragraph" style:parent-style-name="Standard">
      <style:text-properties officeooo:rsid="00454b3d" officeooo:paragraph-rsid="00454b3d"/>
    </style:style>
    <style:style style:name="P18" style:family="paragraph" style:parent-style-name="Standard">
      <style:text-properties officeooo:paragraph-rsid="00484ed7"/>
    </style:style>
    <style:style style:name="P19" style:family="paragraph" style:parent-style-name="Standard">
      <style:text-properties officeooo:rsid="00484ed7" officeooo:paragraph-rsid="00484ed7"/>
    </style:style>
    <style:style style:name="P20" style:family="paragraph" style:parent-style-name="Standard">
      <style:text-properties officeooo:rsid="002ace94" officeooo:paragraph-rsid="003c9674"/>
    </style:style>
    <style:style style:name="P21" style:family="paragraph" style:parent-style-name="Standard">
      <style:paragraph-properties fo:text-align="center" style:justify-single-word="false"/>
      <style:text-properties officeooo:rsid="003b214a" officeooo:paragraph-rsid="003b214a"/>
    </style:style>
    <style:style style:name="P22" style:family="paragraph" style:parent-style-name="Table_20_Contents">
      <style:paragraph-properties fo:text-align="center" style:justify-single-word="false"/>
      <style:text-properties fo:color="#127622" loext:opacity="100%" officeooo:paragraph-rsid="0031962b"/>
    </style:style>
    <style:style style:name="P23" style:family="paragraph" style:parent-style-name="Table_20_Contents">
      <style:paragraph-properties fo:text-align="center" style:justify-single-word="false"/>
      <style:text-properties fo:color="#127622" loext:opacity="100%" officeooo:paragraph-rsid="00322e86"/>
    </style:style>
    <style:style style:name="P24" style:family="paragraph" style:parent-style-name="Table_20_Contents">
      <style:paragraph-properties fo:text-align="center" style:justify-single-word="false"/>
      <style:text-properties fo:color="#127622" loext:opacity="100%" officeooo:paragraph-rsid="00377311"/>
    </style:style>
    <style:style style:name="P25" style:family="paragraph" style:parent-style-name="Table_20_Contents">
      <style:text-properties officeooo:paragraph-rsid="0031962b"/>
    </style:style>
    <style:style style:name="P26" style:family="paragraph" style:parent-style-name="Table_20_Contents">
      <style:text-properties officeooo:paragraph-rsid="0032b827"/>
    </style:style>
    <style:style style:name="P27" style:family="paragraph" style:parent-style-name="Table_20_Contents">
      <style:text-properties officeooo:paragraph-rsid="002ea74f"/>
    </style:style>
    <style:style style:name="P28" style:family="paragraph" style:parent-style-name="Table_20_Contents">
      <style:text-properties officeooo:rsid="0032b827" officeooo:paragraph-rsid="0032b827"/>
    </style:style>
    <style:style style:name="P29" style:family="paragraph" style:parent-style-name="Table_20_Contents">
      <style:text-properties officeooo:paragraph-rsid="002f612a"/>
    </style:style>
    <style:style style:name="P30" style:family="paragraph" style:parent-style-name="Standard">
      <style:paragraph-properties fo:text-align="center" style:justify-single-word="false"/>
      <style:text-properties fo:font-size="10pt" officeooo:rsid="00597ef4" officeooo:paragraph-rsid="00597ef4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officeooo:rsid="004a8314" officeooo:paragraph-rsid="00587230"/>
    </style:style>
    <style:style style:name="P32" style:family="paragraph" style:parent-style-name="Table_20_Contents">
      <style:paragraph-properties fo:text-align="center" style:justify-single-word="false"/>
      <style:text-properties officeooo:rsid="004b161f" officeooo:paragraph-rsid="00587230"/>
    </style:style>
    <style:style style:name="P33" style:family="paragraph" style:parent-style-name="Table_20_Contents">
      <style:text-properties officeooo:paragraph-rsid="00587230"/>
    </style:style>
    <style:style style:name="P34" style:family="paragraph" style:parent-style-name="Table_20_Contents">
      <style:paragraph-properties fo:text-align="center" style:justify-single-word="false"/>
      <style:text-properties officeooo:rsid="004405ae" officeooo:paragraph-rsid="00587230"/>
    </style:style>
    <style:style style:name="P35" style:family="paragraph" style:parent-style-name="Table_20_Contents">
      <style:paragraph-properties fo:text-align="center" style:justify-single-word="false"/>
      <style:text-properties officeooo:rsid="001ca5d8" officeooo:paragraph-rsid="00587230"/>
    </style:style>
    <style:style style:name="P36" style:family="paragraph" style:parent-style-name="Table_20_Contents">
      <style:paragraph-properties fo:text-align="center" style:justify-single-word="false"/>
      <style:text-properties officeooo:rsid="004d15ba" officeooo:paragraph-rsid="00587230"/>
    </style:style>
    <style:style style:name="P37" style:family="paragraph" style:parent-style-name="Standard">
      <style:text-properties officeooo:rsid="00587230" officeooo:paragraph-rsid="00587230"/>
    </style:style>
    <style:style style:name="P38" style:family="paragraph" style:parent-style-name="Standard">
      <style:text-properties officeooo:rsid="00249e05" officeooo:paragraph-rsid="00573944"/>
    </style:style>
    <style:style style:name="P39" style:family="paragraph" style:parent-style-name="Standard">
      <style:text-properties officeooo:paragraph-rsid="00573944"/>
    </style:style>
    <style:style style:name="P40" style:family="paragraph" style:parent-style-name="Standard">
      <style:paragraph-properties fo:text-align="center" style:justify-single-word="false"/>
      <style:text-properties officeooo:rsid="002e3798" officeooo:paragraph-rsid="00573944"/>
    </style:style>
    <style:style style:name="P41" style:family="paragraph" style:parent-style-name="Standard">
      <style:paragraph-properties fo:text-align="center" style:justify-single-word="false"/>
      <style:text-properties fo:font-weight="bold" officeooo:rsid="0024a691" officeooo:paragraph-rsid="00573944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24a691" officeooo:paragraph-rsid="00573944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127622" loext:opacity="100%" officeooo:paragraph-rsid="00573944"/>
    </style:style>
    <style:style style:name="P44" style:family="paragraph" style:parent-style-name="Table_20_Contents">
      <style:text-properties officeooo:rsid="0024a691" officeooo:paragraph-rsid="00573944"/>
    </style:style>
    <style:style style:name="P45" style:family="paragraph" style:parent-style-name="Table_20_Contents">
      <style:text-properties officeooo:rsid="0027f758" officeooo:paragraph-rsid="00573944"/>
    </style:style>
    <style:style style:name="P46" style:family="paragraph" style:parent-style-name="Table_20_Contents">
      <style:text-properties officeooo:rsid="002b4911" officeooo:paragraph-rsid="00573944"/>
    </style:style>
    <style:style style:name="P47" style:family="paragraph" style:parent-style-name="Table_20_Contents">
      <style:text-properties officeooo:rsid="002a42e7" officeooo:paragraph-rsid="00573944"/>
    </style:style>
    <style:style style:name="P48" style:family="paragraph" style:parent-style-name="Table_20_Contents">
      <style:text-properties officeooo:rsid="002ace94" officeooo:paragraph-rsid="00573944"/>
    </style:style>
    <style:style style:name="P49" style:family="paragraph" style:parent-style-name="Table_20_Contents">
      <style:text-properties officeooo:rsid="002e1644" officeooo:paragraph-rsid="00573944"/>
    </style:style>
    <style:style style:name="P50" style:family="paragraph" style:parent-style-name="Table_20_Contents">
      <style:text-properties officeooo:rsid="002c3d55" officeooo:paragraph-rsid="00573944"/>
    </style:style>
    <style:style style:name="P51" style:family="paragraph" style:parent-style-name="Standard">
      <style:text-properties officeooo:rsid="002ace94" officeooo:paragraph-rsid="00573944"/>
    </style:style>
    <style:style style:name="P52" style:family="paragraph" style:parent-style-name="Standard">
      <style:text-properties officeooo:rsid="001f3d1c" officeooo:paragraph-rsid="00573944"/>
    </style:style>
    <style:style style:name="T1" style:family="text">
      <style:text-properties style:text-position="super 58%" officeooo:rsid="004a8314"/>
    </style:style>
    <style:style style:name="T2" style:family="text">
      <style:text-properties officeooo:rsid="001bdd8c"/>
    </style:style>
    <style:style style:name="T3" style:family="text">
      <style:text-properties fo:color="#127622" loext:opacity="100%" officeooo:rsid="001bdd8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position="super 58%" style:text-underline-style="none" officeooo:rsid="004405ae"/>
    </style:style>
    <style:style style:name="T6" style:family="text">
      <style:text-properties fo:color="#127622" loext:opacity="100%"/>
    </style:style>
    <style:style style:name="T7" style:family="text">
      <style:text-properties style:text-position="super 58%" style:text-underline-style="none" officeooo:rsid="001ca5d8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484ed7"/>
    </style:style>
    <style:style style:name="T10" style:family="text">
      <style:text-properties officeooo:rsid="0049fb45"/>
    </style:style>
    <style:style style:name="T11" style:family="text">
      <style:text-properties officeooo:rsid="001fe79e"/>
    </style:style>
    <style:style style:name="T12" style:family="text">
      <style:text-properties officeooo:rsid="005507e2"/>
    </style:style>
    <style:style style:name="T13" style:family="text">
      <style:text-properties officeooo:rsid="002231fd"/>
    </style:style>
    <style:style style:name="T14" style:family="text">
      <style:text-properties fo:background-color="#ffff00" loext:char-shading-value="0"/>
    </style:style>
    <style:style style:name="T15" style:family="text">
      <style:text-properties style:use-window-font-color="true" loext:opacity="0%"/>
    </style:style>
    <style:style style:name="T16" style:family="text">
      <style:text-properties officeooo:rsid="0040009d"/>
    </style:style>
    <style:style style:name="T17" style:family="text">
      <style:text-properties officeooo:rsid="0041ee0c"/>
    </style:style>
    <style:style style:name="T18" style:family="text">
      <style:text-properties officeooo:rsid="001fe79e" fo:background-color="#ffff00" loext:char-shading-value="0"/>
    </style:style>
    <style:style style:name="T19" style:family="text">
      <style:text-properties officeooo:rsid="005203d2"/>
    </style:style>
    <style:style style:name="T20" style:family="text">
      <style:text-properties officeooo:rsid="00530f98"/>
    </style:style>
    <style:style style:name="T21" style:family="text">
      <style:text-properties officeooo:rsid="00454b3d"/>
    </style:style>
    <style:style style:name="T22" style:family="text">
      <style:text-properties officeooo:rsid="00468d0c"/>
    </style:style>
    <style:style style:name="T23" style:family="text">
      <style:text-properties officeooo:rsid="0055d0b9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officeooo:rsid="003c8b58"/>
    </style:style>
    <style:style style:name="T26" style:family="text">
      <style:text-properties officeooo:rsid="0031962b"/>
    </style:style>
    <style:style style:name="T27" style:family="text">
      <style:text-properties fo:background-color="#ffbf00" loext:char-shading-value="0"/>
    </style:style>
    <style:style style:name="T28" style:family="text">
      <style:text-properties officeooo:rsid="0032b827"/>
    </style:style>
    <style:style style:name="T29" style:family="text">
      <style:text-properties officeooo:rsid="0032b827" fo:background-color="#ffff00" loext:char-shading-value="0"/>
    </style:style>
    <style:style style:name="T30" style:family="text">
      <style:text-properties officeooo:rsid="00385a4b"/>
    </style:style>
    <style:style style:name="T31" style:family="text">
      <style:text-properties officeooo:rsid="0032b827" fo:background-color="#ffbf00" loext:char-shading-value="0"/>
    </style:style>
    <style:style style:name="T32" style:family="text">
      <style:text-properties officeooo:rsid="003638f4"/>
    </style:style>
    <style:style style:name="T33" style:family="text">
      <style:text-properties officeooo:rsid="0032b827" fo:background-color="#ffe994" loext:char-shading-value="0"/>
    </style:style>
    <style:style style:name="T34" style:family="text">
      <style:text-properties fo:background-color="#ffe994" loext:char-shading-value="0"/>
    </style:style>
    <style:style style:name="T35" style:family="text">
      <style:text-properties officeooo:rsid="00344a60"/>
    </style:style>
    <style:style style:name="T36" style:family="text">
      <style:text-properties officeooo:rsid="002ace94"/>
    </style:style>
    <style:style style:name="T37" style:family="text">
      <style:text-properties officeooo:rsid="0028d12e"/>
    </style:style>
    <style:style style:name="T38" style:family="text">
      <style:text-properties officeooo:rsid="002a42e7"/>
    </style:style>
    <style:style style:name="T39" style:family="text">
      <style:text-properties officeooo:rsid="0027f758"/>
    </style:style>
    <style:style style:name="T40" style:family="text">
      <style:text-properties style:text-position="super 58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alm 100:4</text:p>
      <text:p text:style-name="Standard">Enter into his gates with thanksgiving, and into his courts with praise: be thankful unto him, and bless his name.</text:p>
      <text:p text:style-name="Standard"/>
      <text:p text:style-name="P2">¶ A Psalm<text:span text:style-name="T1">H4210</text:span> of prais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Psalm 100:1-5</text:p>
            <text:p text:style-name="P4"><text:span text:style-name="T2">[</text:span><text:span text:style-name="T3">1</text:span><text:span text:style-name="T2">] </text:span>Make a joyful noise unto the LORD, all <text:span text:style-name="T4">ye lands</text:span><text:span text:style-name="T5">H776</text:span>.</text:p>
            <text:p text:style-name="P4">[<text:span text:style-name="T6">2</text:span>] Serve the LORD with gladness: come before his presence with singing.</text:p>
            <text:p text:style-name="P4">[<text:span text:style-name="T6">3</text:span>] Know ye that the LORD he is God: it is he that hath made us, and not we ourselves; we are his people, and the sheep of his pasture.</text:p>
            <text:p text:style-name="P4">[<text:span text:style-name="T6">4</text:span>] Enter <text:span text:style-name="T4">into his gates</text:span><text:span text:style-name="T7">H8179</text:span> <text:span text:style-name="T8">with thanksgiving</text:span>, and <text:span text:style-name="T4">into his courts</text:span><text:span text:style-name="T7">H2691</text:span> <text:span text:style-name="T8">with praise</text:span>: be thankful unto him, and bless his name.</text:p>
            <text:p text:style-name="P4">[<text:span text:style-name="T6">5</text:span>] For the LORD is good; his mercy is everlasting; and his truth endureth to all generations.</text:p>
          </table:table-cell>
        </table:table-row>
      </table:table>
      <text:p text:style-name="P5"/>
      <text:p text:style-name="P6"><text:span text:style-name="T6">Psalm 100</text:span><text:span text:style-name="T9"> has the following </text:span><text:span text:style-name="T10">poetic </text:span><text:span text:style-name="T9">format </text:span><text:span text:style-name="T10">(rhythmic structure) which is not uncommon in Hebrew (the entire old testament)</text:span><text:span text:style-name="T9">:</text:span></text:p>
      <text:list text:style-name="L1">
        <text:list-item>
          <text:p text:style-name="P7">Praise</text:p>
        </text:list-item>
        <text:list-item>
          <text:p text:style-name="P7">Reasons to praise</text:p>
        </text:list-item>
        <text:list-item>
          <text:p text:style-name="P7">Praise</text:p>
        </text:list-item>
        <text:list-item>
          <text:p text:style-name="P7">Reasons to praise</text:p>
        </text:list-item>
      </text:list>
      <text:p text:style-name="P5"/>
      <text:p text:style-name="P5"><text:span text:style-name="T6">Psalm 100:1-4</text:span><text:span text:style-name="T11"> not only encourages us to praise the LORD </text:span><text:span text:style-name="T12">but also</text:span><text:span text:style-name="T11"> </text:span><text:span text:style-name="T12">gives us reasons to praise the LORD and</text:span><text:span text:style-name="T11"> also tells us </text:span><text:span text:style-name="T12">ways that we can do so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<text:span text:style-name="T13">v</text:span><text:span text:style-name="T6">1,2b</text:span></text:p>
          </table:table-cell>
          <table:table-cell table:style-name="Table4.B1" office:value-type="string">
            <text:p text:style-name="P9">Make a <text:span text:style-name="T14">joyful noise</text:span></text:p>
          </table:table-cell>
          <table:table-cell table:style-name="Table4.C1" office:value-type="string">
            <text:p text:style-name="P9">With <text:span text:style-name="T14">singing</text:span></text:p>
          </table:table-cell>
        </table:table-row>
        <table:table-row>
          <table:table-cell table:style-name="Table4.A2" office:value-type="string">
            <text:p text:style-name="P8"><text:span text:style-name="T13">v</text:span><text:span text:style-name="T6">2a</text:span></text:p>
          </table:table-cell>
          <table:table-cell table:style-name="Table4.B2" office:value-type="string">
            <text:p text:style-name="P9"><text:span text:style-name="T14">Serve</text:span> the LORD with <text:span text:style-name="T14">gladness</text:span>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8"><text:span text:style-name="T13">v</text:span><text:span text:style-name="T6">4a</text:span><text:span text:style-name="T13">,</text:span><text:span text:style-name="T6">4b</text:span></text:p>
          </table:table-cell>
          <table:table-cell table:style-name="Table4.B2" office:value-type="string">
            <text:p text:style-name="P9">With <text:span text:style-name="T14">thanksgiving</text:span></text:p>
          </table:table-cell>
          <table:table-cell table:style-name="Table4.C2" office:value-type="string">
            <text:p text:style-name="P9">With <text:span text:style-name="T14">praise</text:span></text:p>
          </table:table-cell>
        </table:table-row>
        <table:table-row>
          <table:table-cell table:style-name="Table4.A2" office:value-type="string">
            <text:p text:style-name="P8"><text:span text:style-name="T15">v</text:span><text:span text:style-name="T6">4c</text:span><text:span text:style-name="T13">,</text:span><text:span text:style-name="T6">4d</text:span></text:p>
          </table:table-cell>
          <table:table-cell table:style-name="Table4.B2" office:value-type="string">
            <text:p text:style-name="P10">Be thankful</text:p>
          </table:table-cell>
          <table:table-cell table:style-name="Table4.C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8"><text:span text:style-name="T13">v</text:span><text:span text:style-name="T6">4d</text:span></text:p>
          </table:table-cell>
          <table:table-cell table:style-name="Table4.B5" office:value-type="string">
            <text:p text:style-name="P9">Bless His name (<text:span text:style-name="T14">speak</text:span> good of Him)</text:p>
          </table:table-cell>
          <table:table-cell table:style-name="Table4.C5" office:value-type="string">
            <text:p text:style-name="P11"><text:span text:style-name="T11">To curse someones name </text:span><text:span text:style-name="T16">(</text:span><text:span text:style-name="T17">which is </text:span><text:span text:style-name="T16">the opposite of blessing someones name) </text:span><text:span text:style-name="T11">is to </text:span><text:span text:style-name="T18">speak</text:span><text:span text:style-name="T11"> evil of them </text:span><text:span text:style-name="T19">(</text:span><text:span text:style-name="T6">Mal. 2:2</text:span><text:span text:style-name="T19">, </text:span><text:span text:style-name="T6">Exo. 22:28</text:span><text:span text:style-name="T19">, </text:span><text:span text:style-name="T6">Rom. 12:14</text:span><text:span text:style-name="T19">, </text:span><text:span text:style-name="T6">Matt. 26:74</text:span><text:span text:style-name="T19">, </text:span><text:span text:style-name="T6">I Kings 2:8</text:span><text:span text:style-name="T20">, </text:span><text:span text:style-name="T6">Neh. 10:29</text:span><text:span text:style-name="T20">)</text:span></text:p>
          </table:table-cell>
        </table:table-row>
      </table:table>
      <text:p text:style-name="P12"/>
      <text:p text:style-name="P13"><text:span text:style-name="T6">Psalm 100:3</text:span><text:span text:style-name="T21"> reminds of at least one way that we can be thankful: it reminds us that God is our creator and likens us to the sheep of His pasture. Like a good shepherd, He provides all that we need </text:span><text:span text:style-name="T22">and mor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John 10:11</text:p>
            <text:p text:style-name="P14">I am the good shepherd: the good shepherd giveth his life for the sheep.</text:p>
          </table:table-cell>
          <table:table-cell table:style-name="Table6.B1" office:value-type="string">
            <text:p text:style-name="P15">John 10:14</text:p>
            <text:p text:style-name="P16">I am the good shepherd, and know my sheep, and am known of mine.</text:p>
          </table:table-cell>
        </table:table-row>
      </table:table>
      <text:p text:style-name="P17"/>
      <text:p text:style-name="P18"><text:span text:style-name="T6">Psalm 100:5</text:span><text:span text:style-name="T9"> gives us more reasons to be thankful: God is good </text:span><text:span text:style-name="T23">and</text:span><text:span text:style-name="T9"> His mercy and truth endures forever (</text:span><text:span text:style-name="T6">Ps. 136:1</text:span><text:span text:style-name="T9">)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24"/></text:p>
      <text:p text:style-name="P21"><text:soft-page-break/>There are many parallels between different psalms. <text:span text:style-name="T25">Here is a small sample.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>
          <table:table-cell table:style-name="Table5.A1" office:value-type="string">
            <text:p text:style-name="P22">Psalm 95</text:p>
          </table:table-cell>
          <table:table-cell table:style-name="Table5.A1" office:value-type="string">
            <text:p text:style-name="P23">Psalm 96</text:p>
          </table:table-cell>
          <table:table-cell table:style-name="Table5.A1" office:value-type="string">
            <text:p text:style-name="P24">Psalm 98</text:p>
          </table:table-cell>
          <table:table-cell table:style-name="Table5.D1" office:value-type="string">
            <text:p text:style-name="P22">Psalm 100</text:p>
          </table:table-cell>
        </table:table-row>
        <table:table-row>
          <table:table-cell table:style-name="Table5.A2" office:value-type="string">
            <text:p text:style-name="P25"><text:span text:style-name="T26">[</text:span><text:span text:style-name="T6">1</text:span><text:span text:style-name="T26">] </text:span>O come, <text:span text:style-name="T14">let us sing unto the</text:span><text:span text:style-name="T27"> LORD</text:span>: let us <text:span text:style-name="T14">make a joyful noise</text:span> to the <text:span text:style-name="T27">rock of our salvation</text:span>.</text:p>
          </table:table-cell>
          <table:table-cell table:style-name="Table5.A2" office:value-type="string">
            <text:p text:style-name="P26"><text:span text:style-name="T28">[</text:span><text:span text:style-name="T6">1</text:span><text:span text:style-name="T28">] O </text:span><text:span text:style-name="T29">sing unto the LORD</text:span><text:span text:style-name="T28"> a new song: sing unto the LORD, all the earth. [</text:span><text:span text:style-name="T6">2a</text:span><text:span text:style-name="T28">] Sing unto the LORD,</text:span></text:p>
          </table:table-cell>
          <table:table-cell table:style-name="Table5.A2" office:value-type="string">
            <text:p text:style-name="P26"><text:span text:style-name="T30">[</text:span><text:span text:style-name="T6">4</text:span><text:span text:style-name="T30">] </text:span><text:span text:style-name="T29">Make a joyful noise unto the LORD</text:span><text:span text:style-name="T28">, all the earth: </text:span><text:span text:style-name="T29">make a loud noise</text:span><text:span text:style-name="T28">, and rejoice, and </text:span><text:span text:style-name="T29">sing praise</text:span><text:span text:style-name="T28">. [</text:span><text:span text:style-name="T6">5</text:span><text:span text:style-name="T28">] Sing unto the LORD with the harp; with the harp, and the voice of a psalm. [</text:span><text:span text:style-name="T6">6</text:span><text:span text:style-name="T28">] With trumpets and sound of cornet </text:span><text:span text:style-name="T29">make a joyful noise before the </text:span><text:span text:style-name="T31">LORD</text:span><text:span text:style-name="T28">, the </text:span><text:span text:style-name="T31">King</text:span><text:span text:style-name="T28">.</text:span></text:p>
          </table:table-cell>
          <table:table-cell table:style-name="Table5.D2" office:value-type="string">
            <text:p text:style-name="P25"><text:span text:style-name="T26">[</text:span><text:span text:style-name="T6">1</text:span><text:span text:style-name="T26">] </text:span><text:span text:style-name="T14">Make a joyful noise unto the LORD</text:span>, all ye lands.</text:p>
          </table:table-cell>
        </table:table-row>
        <table:table-row>
          <table:table-cell table:style-name="Table5.A3" office:value-type="string">
            <text:p text:style-name="P27"/>
          </table:table-cell>
          <table:table-cell table:style-name="Table5.A3" office:value-type="string">
            <text:p text:style-name="P27"/>
          </table:table-cell>
          <table:table-cell table:style-name="Table5.A3" office:value-type="string">
            <text:p text:style-name="P27"/>
          </table:table-cell>
          <table:table-cell table:style-name="Table5.D3" office:value-type="string">
            <text:p text:style-name="P27">[<text:span text:style-name="T6">2</text:span>] Serve the LORD with gladness: come before his presence with singing.</text:p>
          </table:table-cell>
        </table:table-row>
        <table:table-row>
          <table:table-cell table:style-name="Table5.A3" office:value-type="string">
            <text:p text:style-name="P27">[<text:span text:style-name="T6">2</text:span>] <text:span text:style-name="T27">Let us come before his presence with thanksgiving</text:span>, and <text:span text:style-name="T14">make a joyful noise unto him with psalms</text:span>.</text:p>
          </table:table-cell>
          <table:table-cell table:style-name="Table5.A3" office:value-type="string">
            <text:p text:style-name="P26"><text:span text:style-name="T28">[</text:span><text:span text:style-name="T6">2b</text:span><text:span text:style-name="T28">,</text:span><text:span text:style-name="T6">2c</text:span><text:span text:style-name="T28">] </text:span><text:span text:style-name="T29">bless his name</text:span><text:span text:style-name="T28">; shew forth his salvation from day to day. </text:span><text:span text:style-name="T32">[</text:span><text:span text:style-name="T6">3</text:span><text:span text:style-name="T32">] </text:span><text:span text:style-name="T33">Declare his glory</text:span><text:span text:style-name="T28"> among the heathen, his wonders </text:span><text:span text:style-name="T33">among all people</text:span><text:span text:style-name="T28">.</text:span></text:p>
          </table:table-cell>
          <table:table-cell table:style-name="Table5.A3" office:value-type="string">
            <text:p text:style-name="P28"/>
          </table:table-cell>
          <table:table-cell table:style-name="Table5.D3" office:value-type="string">
            <text:p text:style-name="P29">[<text:span text:style-name="T6">4</text:span>] <text:span text:style-name="T27">Enter into his gates with thanksgiving</text:span>, and into his courts <text:span text:style-name="T27">with praise</text:span>: be thankful unto him, and <text:span text:style-name="T14">bless his name</text:span>.</text:p>
          </table:table-cell>
        </table:table-row>
        <table:table-row>
          <table:table-cell table:style-name="Table5.A3" office:value-type="string">
            <text:p text:style-name="P27">[<text:span text:style-name="T6">3</text:span>] For the <text:span text:style-name="T34">LORD</text:span> is a great <text:span text:style-name="T34">God</text:span>, and a great <text:span text:style-name="T34">King</text:span> above all gods.</text:p>
          </table:table-cell>
          <table:table-cell table:style-name="Table5.A3" office:value-type="string">
            <text:p text:style-name="P27"><text:span text:style-name="T35">[</text:span><text:span text:style-name="T6">4</text:span><text:span text:style-name="T35">] </text:span>For the LORD is great, and greatly to be praised: he is to be feared above all gods.</text:p>
          </table:table-cell>
          <table:table-cell table:style-name="Table5.A3" office:value-type="string">
            <text:p text:style-name="P27"/>
          </table:table-cell>
          <table:table-cell table:style-name="Table5.D3" office:value-type="string">
            <text:p text:style-name="P29">[<text:span text:style-name="T6">5</text:span>] For the LORD is good; his mercy is everlasting; and his truth endureth to all generations.</text:p>
          </table:table-cell>
        </table:table-row>
        <table:table-row>
          <table:table-cell table:style-name="Table5.A3" office:value-type="string">
            <text:p text:style-name="P27">[<text:span text:style-name="T6">7a</text:span><text:span text:style-name="T30">-</text:span><text:span text:style-name="T6">7c</text:span>] For he is our God; and <text:span text:style-name="T34">we are the people of his pasture</text:span>, and the sheep of his hand.</text:p>
          </table:table-cell>
          <table:table-cell table:style-name="Table5.A3" office:value-type="string">
            <text:p text:style-name="P27"/>
          </table:table-cell>
          <table:table-cell table:style-name="Table5.A3" office:value-type="string">
            <text:p text:style-name="P27"/>
          </table:table-cell>
          <table:table-cell table:style-name="Table5.D3" office:value-type="string">
            <text:p text:style-name="P27">[<text:span text:style-name="T6">3</text:span>] Know ye that the LORD he is God: <text:span text:style-name="T34">it is he that hath made us</text:span>, and not we ourselves; we are his people, and the sheep of his pasture.</text:p>
          </table:table-cell>
        </table:table-row>
      </table:table>
      <text:p text:style-name="P12"/>
      <text:p text:style-name="P30">Strong's definition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H4210</text:p>
            <text:p text:style-name="P32">Psalm</text:p>
          </table:table-cell>
          <table:table-cell table:style-name="Table2.B1" office:value-type="string">
            <text:p text:style-name="P33">מִזְמוֹר mizmôwr, miz-more'; from H2167; properly, instrumental music; by implication, <text:span text:style-name="T14">a poem set to notes</text:span></text:p>
          </table:table-cell>
        </table:table-row>
        <table:table-row>
          <table:table-cell table:style-name="Table2.A2" office:value-type="string">
            <text:p text:style-name="P34">H776</text:p>
            <text:p text:style-name="P32">Ye lands</text:p>
          </table:table-cell>
          <table:table-cell table:style-name="Table2.B2" office:value-type="string">
            <text:p text:style-name="P33">אֶרֶץ ʼerets, eh'-rets; from an unused root probably meaning to be firm; <text:span text:style-name="T14">the earth</text:span> (at large, or partitively a land)</text:p>
          </table:table-cell>
        </table:table-row>
        <table:table-row>
          <table:table-cell table:style-name="Table2.A2" office:value-type="string">
            <text:p text:style-name="P35">H8179</text:p>
            <text:p text:style-name="P32">Into his gates</text:p>
          </table:table-cell>
          <table:table-cell table:style-name="Table2.B3" office:value-type="string">
            <text:p text:style-name="P33">שַׁעַר shaʻar, shah'-ar; from H8176 in its original sense; an opening, i.e. <text:span text:style-name="T14">door or gate</text:span></text:p>
          </table:table-cell>
        </table:table-row>
        <table:table-row>
          <table:table-cell table:style-name="Table2.A2" office:value-type="string">
            <text:p text:style-name="P35">H2691</text:p>
            <text:p text:style-name="P36">Into his courts</text:p>
          </table:table-cell>
          <table:table-cell table:style-name="Table2.B4" office:value-type="string">
            <text:p text:style-name="P33">חָצֵר châtsêr, khaw-tsare'; (masculine and feminine); from H2690 in its original sense; <text:span text:style-name="T14">a yard (as inclosed by a fence)</text:span>; also a hamlet (as similarly surrounded with walls)</text:p>
          </table:table-cell>
        </table:table-row>
      </table:table>
      <text:p text:style-name="P37">Extra</text:p>
      <text:p text:style-name="P37"><text:soft-page-break/></text:p>
      <text:p text:style-name="P38">The book of Psalms is “divided” into five “sections” <text:span text:style-name="T36">with subordinate sections within each primary section</text:span>. <text:span text:style-name="T37">The book of Psalms is not only a book of songs </text:span><text:span text:style-name="T38">and poems </text:span><text:span text:style-name="T37">but also a book of prayers.</text:span></text:p>
      <text:p text:style-name="P39"/>
      <text:p text:style-name="P40">Book of Psalms summary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1">Chapters</text:p>
          </table:table-cell>
          <table:table-cell table:style-name="Table3.B1" office:value-type="string">
            <text:p text:style-name="P42">Theme</text:p>
          </table:table-cell>
        </table:table-row>
        <table:table-row>
          <table:table-cell table:style-name="Table3.A2" table:number-rows-spanned="2" office:value-type="string">
            <text:p text:style-name="P43">Psalm (1,2)-41</text:p>
          </table:table-cell>
          <table:table-cell table:style-name="Table3.B2" office:value-type="string">
            <text:p text:style-name="P44">(1,2) <text:span text:style-name="T39">Introduction (anonymous author)</text:span></text:p>
            <text:p text:style-name="P45">1. Psalm of two ways (righteous vs ungodly)</text:p>
            <text:p text:style-name="P45">2. Psalm of the King (Jesus)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44">3-41 The foundation of covenant faithfulness</text:p>
          </table:table-cell>
        </table:table-row>
        <table:table-row>
          <table:table-cell table:style-name="Table3.A2" table:number-rows-spanned="3" office:value-type="string">
            <text:p text:style-name="P43">Psalm 42-72</text:p>
          </table:table-cell>
          <table:table-cell table:style-name="Table3.B2" office:value-type="string">
            <text:p text:style-name="P46">(42,43) Two poems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47">Hope <text:span text:style-name="T36">for the Messianic Kingdom</text:span>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46">(72) Poem that corresponds with the first two</text:p>
          </table:table-cell>
        </table:table-row>
        <table:table-row>
          <table:table-cell table:style-name="Table3.A2" table:number-rows-spanned="2" office:value-type="string">
            <text:p text:style-name="P43">Psalm 73-89</text:p>
          </table:table-cell>
          <table:table-cell table:style-name="Table3.B2" office:value-type="string">
            <text:p text:style-name="P48">Hope for the Messiah after exile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46">(89) Poem reflecting on God’s promise to David in light of Israel’s exile</text:p>
          </table:table-cell>
        </table:table-row>
        <table:table-row>
          <table:table-cell table:style-name="Table3.A2" table:number-rows-spanned="2" office:value-type="string">
            <text:p text:style-name="P43">Psalm 90-106</text:p>
          </table:table-cell>
          <table:table-cell table:style-name="Table3.B2" office:value-type="string">
            <text:p text:style-name="P49">(90) A prayer of Moses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50">The God of Israel as the King of all creation</text:p>
          </table:table-cell>
        </table:table-row>
        <table:table-row>
          <table:table-cell table:style-name="Table3.A2" office:value-type="string">
            <text:p text:style-name="P43">Psalm 107-150</text:p>
          </table:table-cell>
          <table:table-cell table:style-name="Table3.B2" office:value-type="string">
            <text:p text:style-name="P49">Songs of ascent and poems of praise</text:p>
          </table:table-cell>
        </table:table-row>
      </table:table>
      <text:p text:style-name="P51"><text:span text:style-name="T40">1</text:span><text:span text:style-name="T24">https://bibleproject.com/guides/book-of-psalms/</text:span></text:p>
      <text:p text:style-name="P51"><text:span text:style-name="T24"/></text:p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25T13:22:11.245474492</meta:creation-date>
    <meta:editing-cycles>62</meta:editing-cycles>
    <meta:editing-duration>PT2H52M15S</meta:editing-duration>
    <dc:date>2026-07-11T12:21:18.772540740</dc:date>
    <meta:generator>LibreOffice/26.2.4.2$Linux_X86_64 LibreOffice_project/64a984c51f4702dbd3710b13428c673a2f1292e7</meta:generator>
    <meta:document-statistic meta:table-count="6" meta:image-count="0" meta:object-count="0" meta:page-count="3" meta:paragraph-count="88" meta:word-count="863" meta:character-count="4621" meta:non-whitespace-character-count="3850"/>
  </office:meta>
</office:document-meta>
</file>