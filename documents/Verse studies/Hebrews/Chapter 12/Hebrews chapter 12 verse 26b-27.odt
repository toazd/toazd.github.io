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7" style:family="table">
      <style:table-properties style:width="8in" table:align="margins"/>
    </style:style>
    <style:style style:name="Table17.A" style:family="table-column">
      <style:table-column-properties style:column-width="8in" style:rel-column-width="65535*"/>
    </style:style>
    <style:style style:name="Table17.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18" style:family="table">
      <style:table-properties style:width="8in" table:align="margins"/>
    </style:style>
    <style:style style:name="Table18.A" style:family="table-column">
      <style:table-column-properties style:column-width="8in" style:rel-column-width="65535*"/>
    </style:style>
    <style:style style:name="Table18.A1" style:family="table-cell">
      <style:table-cell-properties fo:padding="0.0382in" fo:border="0.5pt solid #000000"/>
    </style:style>
    <style:style style:name="Table13" style:family="table">
      <style:table-properties style:width="8in" table:align="margins"/>
    </style:style>
    <style:style style:name="Table13.A" style:family="table-column">
      <style:table-column-properties style:column-width="8in" style:rel-column-width="65535*"/>
    </style:style>
    <style:style style:name="Table13.A1" style:family="table-cell">
      <style:table-cell-properties fo:padding="0.0382in" fo:border="0.5pt solid #000000"/>
    </style:style>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19" style:family="table">
      <style:table-properties style:width="8in" table:align="margins"/>
    </style:style>
    <style:style style:name="Table19.A" style:family="table-column">
      <style:table-column-properties style:column-width="8in" style:rel-column-width="65535*"/>
    </style:style>
    <style:style style:name="Table19.A1" style:family="table-cell">
      <style:table-cell-properties fo:padding="0.0382in" fo:border="0.5pt solid #000000"/>
    </style:style>
    <style:style style:name="Table14" style:family="table">
      <style:table-properties style:width="8in" table:align="margins"/>
    </style:style>
    <style:style style:name="Table14.A" style:family="table-column">
      <style:table-column-properties style:column-width="8in" style:rel-column-width="65535*"/>
    </style:style>
    <style:style style:name="Table14.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Table5" style:family="table">
      <style:table-properties style:width="8in" table:align="margins"/>
    </style:style>
    <style:style style:name="Table5.A" style:family="table-column">
      <style:table-column-properties style:column-width="8in" style:rel-column-width="65535*"/>
    </style:style>
    <style:style style:name="Table5.A1" style:family="table-cell">
      <style:table-cell-properties fo:padding="0.0382in" fo:border="0.5pt solid #000000"/>
    </style:style>
    <style:style style:name="Table20" style:family="table">
      <style:table-properties style:width="8in" table:align="margins"/>
    </style:style>
    <style:style style:name="Table20.A" style:family="table-column">
      <style:table-column-properties style:column-width="8in" style:rel-column-width="65535*"/>
    </style:style>
    <style:style style:name="Table20.A1" style:family="table-cell">
      <style:table-cell-properties fo:padding="0.0382in" fo:border="0.5pt solid #000000"/>
    </style:style>
    <style:style style:name="Table6" style:family="table">
      <style:table-properties style:width="8in" table:align="margins"/>
    </style:style>
    <style:style style:name="Table6.A" style:family="table-column">
      <style:table-column-properties style:column-width="8in" style:rel-column-width="65535*"/>
    </style:style>
    <style:style style:name="Table6.A1" style:family="table-cell">
      <style:table-cell-properties fo:padding="0.0382in" fo:border="0.5pt solid #000000"/>
    </style:style>
    <style:style style:name="Table7" style:family="table">
      <style:table-properties style:width="8in" table:align="margins"/>
    </style:style>
    <style:style style:name="Table7.A" style:family="table-column">
      <style:table-column-properties style:column-width="8in" style:rel-column-width="65535*"/>
    </style:style>
    <style:style style:name="Table7.A1" style:family="table-cell">
      <style:table-cell-properties fo:padding="0.0382in" fo:border="0.5pt solid #000000"/>
    </style:style>
    <style:style style:name="Table8" style:family="table">
      <style:table-properties style:width="8in" table:align="margins"/>
    </style:style>
    <style:style style:name="Table8.A" style:family="table-column">
      <style:table-column-properties style:column-width="8in" style:rel-column-width="65535*"/>
    </style:style>
    <style:style style:name="Table8.A1" style:family="table-cell">
      <style:table-cell-properties fo:padding="0.0382in" fo:border="0.5pt solid #000000"/>
    </style:style>
    <style:style style:name="Table15" style:family="table">
      <style:table-properties style:width="8in" table:align="margins"/>
    </style:style>
    <style:style style:name="Table15.A" style:family="table-column">
      <style:table-column-properties style:column-width="8in" style:rel-column-width="65535*"/>
    </style:style>
    <style:style style:name="Table15.A1" style:family="table-cell">
      <style:table-cell-properties fo:padding="0.0382in" fo:border="0.5pt solid #000000"/>
    </style:style>
    <style:style style:name="Table10" style:family="table">
      <style:table-properties style:width="8in" table:align="margins"/>
    </style:style>
    <style:style style:name="Table10.A" style:family="table-column">
      <style:table-column-properties style:column-width="8in" style:rel-column-width="65535*"/>
    </style:style>
    <style:style style:name="Table10.A1" style:family="table-cell">
      <style:table-cell-properties fo:padding="0.0382in" fo:border="0.5pt solid #000000"/>
    </style:style>
    <style:style style:name="Table11" style:family="table">
      <style:table-properties style:width="8in" table:align="margins"/>
    </style:style>
    <style:style style:name="Table11.A" style:family="table-column">
      <style:table-column-properties style:column-width="8in" style:rel-column-width="65535*"/>
    </style:style>
    <style:style style:name="Table11.A1" style:family="table-cell">
      <style:table-cell-properties fo:padding="0.0382in" fo:border="0.5pt solid #000000"/>
    </style:style>
    <style:style style:name="Table9" style:family="table">
      <style:table-properties style:width="8in" table:align="margins"/>
    </style:style>
    <style:style style:name="Table9.A" style:family="table-column">
      <style:table-column-properties style:column-width="8in" style:rel-column-width="65535*"/>
    </style:style>
    <style:style style:name="Table9.A1" style:family="table-cell">
      <style:table-cell-properties fo:padding="0.0382in" fo:border="0.5pt solid #000000"/>
    </style:style>
    <style:style style:name="Table16" style:family="table">
      <style:table-properties style:width="8in" table:align="margins"/>
    </style:style>
    <style:style style:name="Table16.A" style:family="table-column">
      <style:table-column-properties style:column-width="8in" style:rel-column-width="65535*"/>
    </style:style>
    <style:style style:name="Table16.A1" style:family="table-cell">
      <style:table-cell-properties fo:padding="0.0382in" fo:border="0.5pt solid #000000"/>
    </style:style>
    <style:style style:name="Table12" style:family="table">
      <style:table-properties style:width="8in" table:align="margins"/>
    </style:style>
    <style:style style:name="Table12.A" style:family="table-column">
      <style:table-column-properties style:column-width="4in" style:rel-column-width="32768*"/>
    </style:style>
    <style:style style:name="Table12.B" style:family="table-column">
      <style:table-column-properties style:column-width="4in" style:rel-column-width="32767*"/>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left="none" fo:border-right="0.5pt solid #000000" fo:border-top="0.5pt solid #000000" fo:border-bottom="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none" fo:border-right="0.5pt solid #000000" fo:border-top="none" fo:border-bottom="0.5pt solid #000000"/>
    </style:style>
    <style:style style:name="P1" style:family="paragraph" style:parent-style-name="Standard">
      <style:text-properties style:font-name="Liberation Sans" fo:font-size="13pt" style:font-size-asian="13pt" style:font-size-complex="13pt"/>
    </style:style>
    <style:style style:name="P2" style:family="paragraph" style:parent-style-name="Standard" style:list-style-name="L1">
      <style:text-properties officeooo:paragraph-rsid="000e99e3"/>
    </style:style>
    <style:style style:name="P3" style:family="paragraph" style:parent-style-name="Standard">
      <style:text-properties style:font-name="Liberation Sans" fo:font-size="13pt" officeooo:rsid="000f98f8" officeooo:paragraph-rsid="000f98f8" style:font-size-asian="13pt" style:font-size-complex="13pt"/>
    </style:style>
    <style:style style:name="P4" style:family="paragraph" style:parent-style-name="Table_20_Contents">
      <style:text-properties style:font-name="Liberation Sans" fo:font-size="13pt" style:font-size-asian="13pt" style:font-size-complex="13pt"/>
    </style:style>
    <style:style style:name="P5" style:family="paragraph" style:parent-style-name="Standard">
      <style:paragraph-properties fo:text-align="center" style:justify-single-word="false"/>
      <style:text-properties style:font-name="Liberation Sans" fo:font-size="13pt" officeooo:rsid="000f98f8" officeooo:paragraph-rsid="000f98f8" style:font-size-asian="13pt" style:font-size-complex="13pt"/>
    </style:style>
    <style:style style:name="P6" style:family="paragraph" style:parent-style-name="Standard">
      <style:text-properties style:font-name="Liberation Sans" fo:font-size="13pt" officeooo:paragraph-rsid="000f98f8" style:font-size-asian="13pt" style:font-size-complex="13pt"/>
    </style:style>
    <style:style style:name="P7" style:family="paragraph" style:parent-style-name="Standard">
      <style:paragraph-properties fo:text-align="center" style:justify-single-word="false"/>
      <style:text-properties style:font-name="Liberation Sans" fo:font-size="13pt" officeooo:rsid="0083f485" officeooo:paragraph-rsid="0083f485" style:font-size-asian="13pt" style:font-size-complex="13pt"/>
    </style:style>
    <style:style style:name="P8" style:family="paragraph" style:parent-style-name="Standard">
      <style:paragraph-properties fo:text-align="center" style:justify-single-word="false"/>
      <style:text-properties style:font-name="Liberation Sans" fo:font-size="13pt" officeooo:rsid="00430dfe" officeooo:paragraph-rsid="00838bc8" style:font-size-asian="13pt" style:font-size-complex="13pt"/>
    </style:style>
    <style:style style:name="P9" style:family="paragraph" style:parent-style-name="Table_20_Contents">
      <style:text-properties officeooo:paragraph-rsid="00838bc8"/>
    </style:style>
    <style:style style:name="P10" style:family="paragraph" style:parent-style-name="Standard">
      <style:text-properties style:font-name="Liberation Sans" fo:font-size="13pt" officeooo:paragraph-rsid="00838bc8" style:font-size-asian="13pt" style:font-size-complex="13pt"/>
    </style:style>
    <style:style style:name="P11" style:family="paragraph" style:parent-style-name="Standard">
      <style:paragraph-properties fo:text-align="center" style:justify-single-word="false"/>
      <style:text-properties style:font-name="Liberation Sans" fo:font-size="13pt" officeooo:rsid="008d6e6b" officeooo:paragraph-rsid="008d6e6b" style:font-size-asian="13pt" style:font-size-complex="13pt"/>
    </style:style>
    <style:style style:name="P12" style:family="paragraph" style:parent-style-name="Standard" style:list-style-name="L2">
      <style:text-properties style:font-name="Liberation Sans" fo:font-size="13pt" officeooo:paragraph-rsid="005504a8" style:font-size-asian="13pt" style:font-size-complex="13pt"/>
    </style:style>
    <style:style style:name="P13" style:family="paragraph" style:parent-style-name="Standard">
      <style:text-properties style:font-name="Liberation Sans" fo:font-size="13pt" officeooo:rsid="004989b2" officeooo:paragraph-rsid="0016ba6a" style:font-size-asian="13pt" style:font-size-complex="13pt"/>
    </style:style>
    <style:style style:name="P14" style:family="paragraph" style:parent-style-name="Standard">
      <style:paragraph-properties fo:text-align="center" style:justify-single-word="false"/>
      <style:text-properties style:font-name="Liberation Sans" fo:font-size="13pt" officeooo:rsid="004989b2" officeooo:paragraph-rsid="005554d0" style:font-size-asian="13pt" style:font-size-complex="13pt"/>
    </style:style>
    <style:style style:name="P15" style:family="paragraph" style:parent-style-name="Standard">
      <style:paragraph-properties fo:text-align="left" style:justify-single-word="false"/>
      <style:text-properties style:font-name="Liberation Sans" fo:font-size="13pt" officeooo:rsid="004989b2" officeooo:paragraph-rsid="005504a8" style:font-size-asian="13pt" style:font-size-complex="13pt"/>
    </style:style>
    <style:style style:name="P16" style:family="paragraph" style:parent-style-name="Standard">
      <style:text-properties officeooo:paragraph-rsid="004b643f"/>
    </style:style>
    <style:style style:name="P17" style:family="paragraph" style:parent-style-name="Standard">
      <style:text-properties style:font-name="Liberation Sans" fo:font-size="13pt" officeooo:rsid="0016ba6a" officeooo:paragraph-rsid="004b643f" style:font-size-asian="13pt" style:font-size-complex="13pt"/>
    </style:style>
    <style:style style:name="P18" style:family="paragraph" style:parent-style-name="Table_20_Contents">
      <style:text-properties fo:color="#127622" loext:opacity="100%" style:font-name="Liberation Sans" fo:font-size="13pt" officeooo:paragraph-rsid="008df8c6" style:font-size-asian="13pt" style:font-size-complex="13pt"/>
    </style:style>
    <style:style style:name="P19" style:family="paragraph" style:parent-style-name="Table_20_Contents">
      <style:text-properties style:font-name="Liberation Sans" fo:font-size="13pt" officeooo:paragraph-rsid="008df8c6" style:font-size-asian="13pt" style:font-size-complex="13pt"/>
    </style:style>
    <style:style style:name="P20" style:family="paragraph" style:parent-style-name="Standard">
      <style:text-properties style:font-name="Liberation Sans" fo:font-size="13pt" officeooo:rsid="0056ad5f" officeooo:paragraph-rsid="0056ad5f" style:font-size-asian="13pt" style:font-size-complex="13pt"/>
    </style:style>
    <style:style style:name="P21" style:family="paragraph" style:parent-style-name="Standard">
      <style:paragraph-properties fo:text-align="center" style:justify-single-word="false"/>
      <style:text-properties style:font-name="Liberation Sans" fo:font-size="13pt" officeooo:rsid="0049dc24" officeooo:paragraph-rsid="0049dc24" style:font-size-asian="13pt" style:font-size-complex="13pt"/>
    </style:style>
    <style:style style:name="P22" style:family="paragraph" style:parent-style-name="Standard">
      <style:text-properties style:font-name="Liberation Sans" fo:font-size="13pt" officeooo:paragraph-rsid="0016ba6a" style:font-size-asian="13pt" style:font-size-complex="13pt"/>
    </style:style>
    <style:style style:name="P23" style:family="paragraph" style:parent-style-name="Standard">
      <style:paragraph-properties fo:text-align="center" style:justify-single-word="false"/>
      <style:text-properties style:font-name="Liberation Sans" fo:font-size="13pt" officeooo:rsid="00919da9" officeooo:paragraph-rsid="00919da9" style:font-size-asian="13pt" style:font-size-complex="13pt"/>
    </style:style>
    <style:style style:name="P24" style:family="paragraph" style:parent-style-name="Standard">
      <style:text-properties style:font-name="Liberation Sans" fo:font-size="13pt" officeooo:rsid="0016ba6a" officeooo:paragraph-rsid="005a251e" style:font-size-asian="13pt" style:font-size-complex="13pt"/>
    </style:style>
    <style:style style:name="P25" style:family="paragraph" style:parent-style-name="Standard" style:list-style-name="L3">
      <style:text-properties officeooo:paragraph-rsid="005a251e"/>
    </style:style>
    <style:style style:name="P26" style:family="paragraph" style:parent-style-name="Standard">
      <style:paragraph-properties fo:text-align="center" style:justify-single-word="false"/>
      <style:text-properties officeooo:paragraph-rsid="001b8d61"/>
    </style:style>
    <style:style style:name="P27" style:family="paragraph" style:parent-style-name="Standard">
      <style:text-properties style:font-name="Liberation Sans" fo:font-size="13pt" officeooo:rsid="0026efa8" officeooo:paragraph-rsid="001b8d61" style:font-size-asian="13pt" style:font-size-complex="13pt"/>
    </style:style>
    <style:style style:name="P28" style:family="paragraph" style:parent-style-name="Standard" style:list-style-name="L4">
      <style:text-properties style:font-name="Liberation Sans" fo:font-size="13pt" officeooo:rsid="0092ed13" officeooo:paragraph-rsid="0092ed13" style:font-size-asian="13pt" style:font-size-complex="13pt"/>
    </style:style>
    <style:style style:name="P29" style:family="paragraph" style:parent-style-name="Standard">
      <style:paragraph-properties fo:text-align="center" style:justify-single-word="false"/>
      <style:text-properties style:font-name="Liberation Sans" fo:font-size="13pt" officeooo:rsid="0026efa8" officeooo:paragraph-rsid="0026efa8" style:font-size-asian="13pt" style:font-size-complex="13pt"/>
    </style:style>
    <style:style style:name="P30" style:family="paragraph" style:parent-style-name="Standard">
      <style:text-properties style:font-name="Liberation Sans" fo:font-size="13pt" officeooo:rsid="001b8d61" officeooo:paragraph-rsid="001b8d61" style:font-size-asian="13pt" style:font-size-complex="13pt"/>
    </style:style>
    <style:style style:name="P31" style:family="paragraph" style:parent-style-name="Standard" style:list-style-name="L5">
      <style:text-properties style:use-window-font-color="true" loext:opacity="0%" officeooo:rsid="009d4719" officeooo:paragraph-rsid="009d4719"/>
    </style:style>
    <style:style style:name="P32" style:family="paragraph" style:parent-style-name="Standard" style:list-style-name="L5">
      <style:text-properties officeooo:paragraph-rsid="001fc1e8"/>
    </style:style>
    <style:style style:name="P33" style:family="paragraph" style:parent-style-name="Standard">
      <style:text-properties style:font-name="Liberation Sans" fo:font-size="13pt" officeooo:rsid="0020b254" officeooo:paragraph-rsid="0020b254" style:font-size-asian="13pt" style:font-size-complex="13pt"/>
    </style:style>
    <style:style style:name="P34" style:family="paragraph" style:parent-style-name="Standard">
      <style:text-properties style:font-name="Liberation Sans" fo:font-size="13pt" officeooo:rsid="001fc1e8" officeooo:paragraph-rsid="001fc1e8" style:font-size-asian="13pt" style:font-size-complex="13pt"/>
    </style:style>
    <style:style style:name="P35" style:family="paragraph" style:parent-style-name="Standard" style:list-style-name="L6">
      <style:text-properties style:font-name="Liberation Sans" fo:font-size="13pt" officeooo:rsid="0020b254" officeooo:paragraph-rsid="004f08b2" style:font-size-asian="13pt" style:font-size-complex="13pt"/>
    </style:style>
    <style:style style:name="P36" style:family="paragraph" style:parent-style-name="Standard" style:list-style-name="L6">
      <style:text-properties style:font-name="Liberation Sans" fo:font-size="13pt" officeooo:rsid="00a2bb38" officeooo:paragraph-rsid="00a2bb38" style:font-size-asian="13pt" style:font-size-complex="13pt"/>
    </style:style>
    <style:style style:name="P37" style:family="paragraph" style:parent-style-name="Standard" style:list-style-name="L6">
      <style:text-properties officeooo:paragraph-rsid="00a2bb38"/>
    </style:style>
    <style:style style:name="P38" style:family="paragraph" style:parent-style-name="Standard">
      <style:text-properties officeooo:paragraph-rsid="00a2bb38"/>
    </style:style>
    <style:style style:name="P39" style:family="paragraph" style:parent-style-name="Standard" style:list-style-name="L6">
      <style:text-properties officeooo:paragraph-rsid="0023a7ec"/>
    </style:style>
    <style:style style:name="P40" style:family="paragraph" style:parent-style-name="Standard">
      <style:text-properties style:font-name="Liberation Sans" fo:font-size="13pt" officeooo:paragraph-rsid="0023a7ec" style:font-size-asian="13pt" style:font-size-complex="13pt"/>
    </style:style>
    <style:style style:name="P41" style:family="paragraph" style:parent-style-name="Standard">
      <style:text-properties style:font-name="Liberation Sans" fo:font-size="13pt" officeooo:rsid="005fd9fb" officeooo:paragraph-rsid="005fd9fb" style:font-size-asian="13pt" style:font-size-complex="13pt"/>
    </style:style>
    <style:style style:name="P42" style:family="paragraph" style:parent-style-name="Standard" style:list-style-name="L7">
      <style:text-properties style:font-name="Liberation Sans" fo:font-size="13pt" officeooo:rsid="0060c6b5" officeooo:paragraph-rsid="0060c6b5" style:font-size-asian="13pt" style:font-size-complex="13pt"/>
    </style:style>
    <style:style style:name="P43" style:family="paragraph" style:parent-style-name="Standard">
      <style:text-properties style:font-name="Liberation Sans" fo:font-size="13pt" officeooo:paragraph-rsid="0060c6b5" style:font-size-asian="13pt" style:font-size-complex="13pt"/>
    </style:style>
    <style:style style:name="P44" style:family="paragraph" style:parent-style-name="Standard">
      <style:paragraph-properties fo:text-align="center" style:justify-single-word="false"/>
      <style:text-properties style:font-name="Liberation Sans" fo:font-size="13pt" officeooo:rsid="0068fb0e" officeooo:paragraph-rsid="0068fb0e" style:font-size-asian="13pt" style:font-size-complex="13pt"/>
    </style:style>
    <style:style style:name="P45" style:family="paragraph" style:parent-style-name="Table_20_Contents">
      <style:text-properties officeooo:paragraph-rsid="00661f23"/>
    </style:style>
    <style:style style:name="P46" style:family="paragraph" style:parent-style-name="Table_20_Contents">
      <style:text-properties style:font-name="Liberation Sans" fo:font-size="13pt" officeooo:paragraph-rsid="00661f23" style:font-size-asian="13pt" style:font-size-complex="13pt"/>
    </style:style>
    <style:style style:name="P47" style:family="paragraph" style:parent-style-name="Standard">
      <style:text-properties style:font-name="Liberation Sans" fo:font-size="13pt" officeooo:rsid="001fc1e8" officeooo:paragraph-rsid="00661f23" style:font-size-asian="13pt" style:font-size-complex="13pt"/>
    </style:style>
    <style:style style:name="P48" style:family="paragraph" style:parent-style-name="Standard">
      <style:paragraph-properties fo:text-align="center" style:justify-single-word="false"/>
      <style:text-properties style:font-name="Liberation Sans" fo:font-size="13pt" officeooo:rsid="006b64a0" officeooo:paragraph-rsid="006b64a0" style:font-size-asian="13pt" style:font-size-complex="13pt"/>
    </style:style>
    <style:style style:name="P49" style:family="paragraph" style:parent-style-name="Standard" style:list-style-name="L8">
      <style:text-properties officeooo:paragraph-rsid="00518bb6"/>
    </style:style>
    <style:style style:name="P50" style:family="paragraph" style:parent-style-name="Standard">
      <style:text-properties style:font-name="Liberation Sans" fo:font-size="13pt" officeooo:paragraph-rsid="00518bb6" style:font-size-asian="13pt" style:font-size-complex="13pt"/>
    </style:style>
    <style:style style:name="P51" style:family="paragraph" style:parent-style-name="Standard" style:list-style-name="L8">
      <style:text-properties style:font-name="Liberation Sans" fo:font-size="13pt" officeooo:rsid="006de92b" officeooo:paragraph-rsid="006de92b" style:font-size-asian="13pt" style:font-size-complex="13pt"/>
    </style:style>
    <style:style style:name="P52" style:family="paragraph" style:parent-style-name="Standard" style:list-style-name="L8">
      <style:text-properties style:font-name="Liberation Sans" fo:font-size="13pt" officeooo:rsid="006f471c" officeooo:paragraph-rsid="006f471c" style:font-size-asian="13pt" style:font-size-complex="13pt"/>
    </style:style>
    <style:style style:name="P53" style:family="paragraph" style:parent-style-name="Standard" style:list-style-name="L8">
      <style:text-properties officeooo:paragraph-rsid="006e0882"/>
    </style:style>
    <style:style style:name="P54" style:family="paragraph" style:parent-style-name="Standard">
      <style:text-properties style:font-name="Liberation Sans" fo:font-size="13pt" officeooo:rsid="006f471c" officeooo:paragraph-rsid="006f471c" style:font-size-asian="13pt" style:font-size-complex="13pt"/>
    </style:style>
    <style:style style:name="P55" style:family="paragraph" style:parent-style-name="Standard">
      <style:paragraph-properties fo:text-align="center" style:justify-single-word="false"/>
      <style:text-properties style:font-name="Liberation Sans" fo:font-size="13pt" officeooo:rsid="007d82a6" officeooo:paragraph-rsid="007d82a6" style:font-size-asian="13pt" style:font-size-complex="13pt"/>
    </style:style>
    <style:style style:name="P56" style:family="paragraph" style:parent-style-name="Standard">
      <style:text-properties style:font-name="Liberation Sans" fo:font-size="13pt" officeooo:paragraph-rsid="006f471c" style:font-size-asian="13pt" style:font-size-complex="13pt"/>
    </style:style>
    <style:style style:name="P57" style:family="paragraph" style:parent-style-name="Standard">
      <style:paragraph-properties fo:text-align="center" style:justify-single-word="false"/>
      <style:text-properties style:font-name="Liberation Sans" fo:font-size="13pt" officeooo:paragraph-rsid="00644c48" style:font-size-asian="13pt" style:font-size-complex="13pt"/>
    </style:style>
    <style:style style:name="P58" style:family="paragraph" style:parent-style-name="Standard">
      <style:paragraph-properties fo:text-align="left" style:justify-single-word="false" fo:break-before="page"/>
      <style:text-properties style:font-name="Liberation Sans" fo:font-size="13pt" officeooo:rsid="00727d47" officeooo:paragraph-rsid="00727d47" style:font-size-asian="13pt" style:font-size-complex="13pt"/>
    </style:style>
    <style:style style:name="P59" style:family="paragraph" style:parent-style-name="Standard">
      <style:paragraph-properties fo:text-align="left" style:justify-single-word="false"/>
      <style:text-properties style:font-name="Liberation Sans" fo:font-size="13pt" officeooo:rsid="00727d47" officeooo:paragraph-rsid="00727d47" style:font-size-asian="13pt" style:font-size-complex="13pt"/>
    </style:style>
    <style:style style:name="P60" style:family="paragraph" style:parent-style-name="Standard">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61" style:family="paragraph" style:parent-style-name="Table_20_Contents">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62" style:family="paragraph" style:parent-style-name="Standard">
      <style:text-properties style:font-name="Liberation Sans" fo:font-size="13pt" officeooo:rsid="00345401" officeooo:paragraph-rsid="00644c48" style:font-size-asian="13pt" style:font-size-complex="13pt"/>
    </style:style>
    <style:style style:name="P63" style:family="paragraph" style:parent-style-name="Standard">
      <style:text-properties style:font-name="Liberation Sans" fo:font-size="13pt" officeooo:rsid="00361aaf" officeooo:paragraph-rsid="00644c48" style:font-size-asian="13pt" style:font-size-complex="13pt"/>
    </style:style>
    <style:style style:name="P64" style:family="paragraph" style:parent-style-name="Standard">
      <style:text-properties style:font-name="Liberation Sans" fo:font-size="13pt" officeooo:rsid="0034c1d6" officeooo:paragraph-rsid="00644c48" style:font-size-asian="13pt" style:font-size-complex="13pt"/>
    </style:style>
    <style:style style:name="P65" style:family="paragraph" style:parent-style-name="Standard">
      <style:text-properties style:font-name="Liberation Sans" fo:font-size="13pt" officeooo:rsid="003f1613" officeooo:paragraph-rsid="00644c48" style:font-size-asian="13pt" style:font-size-complex="13pt"/>
    </style:style>
    <style:style style:name="P66" style:family="paragraph" style:parent-style-name="Standard">
      <style:text-properties style:font-name="Liberation Sans" fo:font-size="13pt" officeooo:rsid="004058c3" officeooo:paragraph-rsid="00644c48" style:font-size-asian="13pt" style:font-size-complex="13pt"/>
    </style:style>
    <style:style style:name="P67" style:family="paragraph" style:parent-style-name="Standard">
      <style:text-properties style:font-name="Liberation Sans" fo:font-size="13pt" officeooo:rsid="002982d2" officeooo:paragraph-rsid="00644c48" style:font-size-asian="13pt" style:font-size-complex="13pt"/>
    </style:style>
    <style:style style:name="P68" style:family="paragraph" style:parent-style-name="Standard">
      <style:text-properties style:font-name="Liberation Sans" fo:font-size="13pt" officeooo:rsid="002ea812" officeooo:paragraph-rsid="00644c48" style:font-size-asian="13pt" style:font-size-complex="13pt"/>
    </style:style>
    <style:style style:name="P69" style:family="paragraph" style:parent-style-name="Table_20_Contents">
      <style:text-properties style:font-name="Liberation Sans" fo:font-size="13pt" officeooo:rsid="002ebce0" officeooo:paragraph-rsid="00644c48" style:font-size-asian="13pt" style:font-size-complex="13pt"/>
    </style:style>
    <style:style style:name="P70" style:family="paragraph" style:parent-style-name="Table_20_Contents">
      <style:text-properties style:font-name="Liberation Sans" fo:font-size="13pt" officeooo:paragraph-rsid="00644c48" style:font-size-asian="13pt" style:font-size-complex="13pt"/>
    </style:style>
    <style:style style:name="P71" style:family="paragraph" style:parent-style-name="Table_20_Contents">
      <style:text-properties style:font-name="Liberation Sans" fo:font-size="13pt" officeooo:rsid="0030fe49" officeooo:paragraph-rsid="00644c48" style:font-size-asian="13pt" style:font-size-complex="13pt"/>
    </style:style>
    <style:style style:name="P72" style:family="paragraph" style:parent-style-name="Table_20_Contents">
      <style:text-properties officeooo:paragraph-rsid="00644c48"/>
    </style:style>
    <style:style style:name="P73" style:family="paragraph" style:parent-style-name="Table_20_Contents">
      <style:text-properties style:font-name="Liberation Sans" fo:font-size="13pt" officeooo:rsid="004058c3" officeooo:paragraph-rsid="00644c48" style:font-size-asian="13pt" style:font-size-complex="13pt"/>
    </style:style>
    <style:style style:name="T1" style:family="text">
      <style:text-properties fo:color="#127622" loext:opacity="100%" fo:font-weight="bold" style:font-weight-asian="bold" style:font-weight-complex="bold"/>
    </style:style>
    <style:style style:name="T2" style:family="text">
      <style:text-properties fo:color="#127622" loext:opacity="100%" fo:font-weight="bold" officeooo:rsid="000e3f41" style:font-weight-asian="bold" style:font-weight-complex="bold"/>
    </style:style>
    <style:style style:name="T3" style:family="text">
      <style:text-properties fo:color="#127622" loext:opacity="100%"/>
    </style:style>
    <style:style style:name="T4" style:family="text">
      <style:text-properties style:font-name="Liberation Sans" fo:font-size="13pt" officeooo:rsid="000e99e3" style:font-size-asian="13pt" style:font-size-complex="13pt"/>
    </style:style>
    <style:style style:name="T5" style:family="text">
      <style:text-properties fo:color="#127622" loext:opacity="100%" style:font-name="Liberation Sans" fo:font-size="13pt" style:font-size-asian="13pt" style:font-size-complex="13pt"/>
    </style:style>
    <style:style style:name="T6" style:family="text">
      <style:text-properties style:font-name="Liberation Sans" fo:font-size="13pt" officeooo:rsid="007fe8e2" style:font-size-asian="13pt" style:font-size-complex="13pt"/>
    </style:style>
    <style:style style:name="T7" style:family="text">
      <style:text-properties style:font-name="Liberation Sans" fo:font-size="13pt" officeooo:rsid="0011dca7" style:font-size-asian="13pt" style:font-size-complex="13pt"/>
    </style:style>
    <style:style style:name="T8" style:family="text">
      <style:text-properties style:font-name="Liberation Sans" fo:font-size="13pt" officeooo:rsid="000f98f8" style:font-size-asian="13pt" style:font-size-complex="13pt"/>
    </style:style>
    <style:style style:name="T9" style:family="text">
      <style:text-properties style:font-name="Liberation Sans" fo:font-size="13pt" officeooo:rsid="00100798" style:font-size-asian="13pt" style:font-size-complex="13pt"/>
    </style:style>
    <style:style style:name="T10" style:family="text">
      <style:text-properties style:font-name="Liberation Sans" fo:font-size="13pt" officeooo:rsid="00114f4c" style:font-size-asian="13pt" style:font-size-complex="13pt"/>
    </style:style>
    <style:style style:name="T11" style:family="text">
      <style:text-properties fo:background-color="#ffff00" loext:char-shading-value="0"/>
    </style:style>
    <style:style style:name="T12" style:family="text">
      <style:text-properties style:font-name="Liberation Sans" fo:font-size="13pt" style:font-size-asian="13pt" style:font-size-complex="13pt"/>
    </style:style>
    <style:style style:name="T13" style:family="text">
      <style:text-properties style:font-name="Liberation Sans" fo:font-size="13pt" fo:background-color="#ffff00" loext:char-shading-value="0" style:font-size-asian="13pt" style:font-size-complex="13pt"/>
    </style:style>
    <style:style style:name="T14" style:family="text">
      <style:text-properties officeooo:rsid="0089ad54"/>
    </style:style>
    <style:style style:name="T15" style:family="text">
      <style:text-properties officeooo:rsid="00873bc9"/>
    </style:style>
    <style:style style:name="T16" style:family="text">
      <style:text-properties style:use-window-font-color="true" loext:opacity="0%"/>
    </style:style>
    <style:style style:name="T17" style:family="text">
      <style:text-properties style:use-window-font-color="true" loext:opacity="0%" fo:background-color="#ffff00" loext:char-shading-value="0"/>
    </style:style>
    <style:style style:name="T18" style:family="text">
      <style:text-properties officeooo:rsid="00134cbf"/>
    </style:style>
    <style:style style:name="T19" style:family="text">
      <style:text-properties officeooo:rsid="0014ffff"/>
    </style:style>
    <style:style style:name="T20" style:family="text">
      <style:text-properties officeooo:rsid="00138aae"/>
    </style:style>
    <style:style style:name="T21" style:family="text">
      <style:text-properties officeooo:rsid="0043ea07"/>
    </style:style>
    <style:style style:name="T22" style:family="text">
      <style:text-properties style:font-name="Liberation Sans" fo:font-size="13pt" officeooo:rsid="0016ba6a" style:font-size-asian="13pt" style:font-size-complex="13pt"/>
    </style:style>
    <style:style style:name="T23" style:family="text">
      <style:text-properties style:font-name="Liberation Sans" fo:font-size="13pt" officeooo:rsid="004b643f" style:font-size-asian="13pt" style:font-size-complex="13pt"/>
    </style:style>
    <style:style style:name="T24" style:family="text">
      <style:text-properties style:font-name="Liberation Sans" fo:font-size="13pt" officeooo:rsid="0018515e" style:font-size-asian="13pt" style:font-size-complex="13pt"/>
    </style:style>
    <style:style style:name="T25" style:family="text">
      <style:text-properties style:font-name="Liberation Sans" fo:font-size="13pt" officeooo:rsid="00452b10" style:font-size-asian="13pt" style:font-size-complex="13pt"/>
    </style:style>
    <style:style style:name="T26" style:family="text">
      <style:text-properties style:font-name="Liberation Sans" fo:font-size="13pt" officeooo:rsid="004b86bc" style:font-size-asian="13pt" style:font-size-complex="13pt"/>
    </style:style>
    <style:style style:name="T27" style:family="text">
      <style:text-properties style:font-name="Liberation Sans" fo:font-size="13pt" style:text-underline-style="solid" style:text-underline-width="auto" style:text-underline-color="font-color" officeooo:rsid="00452b10" style:font-size-asian="13pt" style:font-size-complex="13pt"/>
    </style:style>
    <style:style style:name="T28" style:family="text">
      <style:text-properties style:font-name="Liberation Sans" fo:font-size="13pt" style:text-underline-style="solid" style:text-underline-width="auto" style:text-underline-color="font-color" officeooo:rsid="0045eef0" style:font-size-asian="13pt" style:font-size-complex="13pt"/>
    </style:style>
    <style:style style:name="T29" style:family="text">
      <style:text-properties style:font-name="Liberation Sans" fo:font-size="13pt" officeooo:rsid="0045eef0" style:font-size-asian="13pt" style:font-size-complex="13pt"/>
    </style:style>
    <style:style style:name="T30" style:family="text">
      <style:text-properties style:font-name="Liberation Sans" fo:font-size="13pt" officeooo:rsid="004768ef" style:font-size-asian="13pt" style:font-size-complex="13pt"/>
    </style:style>
    <style:style style:name="T31" style:family="text">
      <style:text-properties style:font-name="Liberation Sans" fo:font-size="13pt" officeooo:rsid="00463ba5" style:font-size-asian="13pt" style:font-size-complex="13pt"/>
    </style:style>
    <style:style style:name="T32" style:family="text">
      <style:text-properties style:font-name="Liberation Sans" fo:font-size="13pt" officeooo:rsid="0049260d" style:font-size-asian="13pt" style:font-size-complex="13pt"/>
    </style:style>
    <style:style style:name="T33" style:family="text">
      <style:text-properties officeooo:rsid="008df8c6"/>
    </style:style>
    <style:style style:name="T34" style:family="text">
      <style:text-properties officeooo:rsid="0058258b"/>
    </style:style>
    <style:style style:name="T35" style:family="text">
      <style:text-properties officeooo:rsid="00909eb4"/>
    </style:style>
    <style:style style:name="T36" style:family="text">
      <style:text-properties officeooo:rsid="008f7950"/>
    </style:style>
    <style:style style:name="T37" style:family="text">
      <style:text-properties style:text-position="super 58%" style:font-name="Liberation Sans" fo:font-size="13pt" officeooo:rsid="004b3fa9" style:font-size-asian="13pt" style:font-size-complex="13pt"/>
    </style:style>
    <style:style style:name="T38" style:family="text">
      <style:text-properties style:font-name="Liberation Sans" fo:font-size="13pt" officeooo:rsid="001b06e8" style:font-size-asian="13pt" style:font-size-complex="13pt"/>
    </style:style>
    <style:style style:name="T39" style:family="text">
      <style:text-properties style:font-name="Liberation Sans" fo:font-size="13pt" officeooo:rsid="001b8d61" style:font-size-asian="13pt" style:font-size-complex="13pt"/>
    </style:style>
    <style:style style:name="T40" style:family="text">
      <style:text-properties style:text-position="super 58%" style:font-name="Liberation Sans" fo:font-size="13pt" officeooo:rsid="001c4573" style:font-size-asian="13pt" style:font-size-complex="13pt"/>
    </style:style>
    <style:style style:name="T41" style:family="text">
      <style:text-properties officeooo:rsid="009553a1"/>
    </style:style>
    <style:style style:name="T42" style:family="text">
      <style:text-properties officeooo:rsid="0095cfec"/>
    </style:style>
    <style:style style:name="T43" style:family="text">
      <style:text-properties officeooo:rsid="0097c5be"/>
    </style:style>
    <style:style style:name="T44" style:family="text">
      <style:text-properties fo:color="#127622" loext:opacity="100%" officeooo:rsid="0095cfec"/>
    </style:style>
    <style:style style:name="T45" style:family="text">
      <style:text-properties officeooo:rsid="009c34ae"/>
    </style:style>
    <style:style style:name="T46" style:family="text">
      <style:text-properties officeooo:rsid="009aad9f"/>
    </style:style>
    <style:style style:name="T47" style:family="text">
      <style:text-properties style:font-name="Liberation Sans" fo:font-size="13pt" officeooo:rsid="009e7c64" style:font-size-asian="13pt" style:font-size-complex="13pt"/>
    </style:style>
    <style:style style:name="T48" style:family="text">
      <style:text-properties style:font-name="Liberation Sans" fo:font-size="13pt" officeooo:rsid="001fc1e8" style:font-size-asian="13pt" style:font-size-complex="13pt"/>
    </style:style>
    <style:style style:name="T49" style:family="text">
      <style:text-properties style:use-window-font-color="true" loext:opacity="0%" style:font-name="Liberation Sans" fo:font-size="13pt" style:font-size-asian="13pt" style:font-size-complex="13pt"/>
    </style:style>
    <style:style style:name="T50" style:family="text">
      <style:text-properties style:text-position="super 58%" style:font-name="Liberation Sans" fo:font-size="13pt" officeooo:rsid="005c1f12" style:font-size-asian="13pt" style:font-size-complex="13pt"/>
    </style:style>
    <style:style style:name="T51" style:family="text">
      <style:text-properties style:text-position="super 58%" style:font-name="Liberation Sans" fo:font-size="13pt" officeooo:rsid="005d0690" fo:background-color="transparent" loext:char-shading-value="0" style:font-size-asian="13pt" style:font-size-complex="13pt"/>
    </style:style>
    <style:style style:name="T52" style:family="text">
      <style:text-properties style:text-position="super 58%" style:font-name="Liberation Sans" fo:font-size="13pt" officeooo:rsid="00230677" fo:background-color="transparent" loext:char-shading-value="0" style:font-size-asian="13pt" style:font-size-complex="13pt"/>
    </style:style>
    <style:style style:name="T53" style:family="text">
      <style:text-properties style:text-position="super 58%" style:font-name="Liberation Sans" fo:font-size="13pt" fo:background-color="transparent" loext:char-shading-value="0" style:font-size-asian="13pt" style:font-size-complex="13pt"/>
    </style:style>
    <style:style style:name="T54" style:family="text">
      <style:text-properties style:use-window-font-color="true" loext:opacity="0%" officeooo:rsid="00a3b1ff"/>
    </style:style>
    <style:style style:name="T55" style:family="text">
      <style:text-properties style:font-name="Liberation Sans" fo:font-size="13pt" officeooo:rsid="00a2bb38" style:font-size-asian="13pt" style:font-size-complex="13pt"/>
    </style:style>
    <style:style style:name="T56" style:family="text">
      <style:text-properties style:font-name="Liberation Sans" fo:font-size="13pt" officeooo:rsid="00a56088" style:font-size-asian="13pt" style:font-size-complex="13pt"/>
    </style:style>
    <style:style style:name="T57" style:family="text">
      <style:text-properties fo:color="#127622" loext:opacity="100%" style:font-name="Liberation Sans" fo:font-size="13pt" officeooo:rsid="00a2bb38" style:font-size-asian="13pt" style:font-size-complex="13pt"/>
    </style:style>
    <style:style style:name="T58" style:family="text">
      <style:text-properties style:font-name="Liberation Sans" fo:font-size="13pt" officeooo:rsid="0023a7ec" style:font-size-asian="13pt" style:font-size-complex="13pt"/>
    </style:style>
    <style:style style:name="T59" style:family="text">
      <style:text-properties style:font-name="Liberation Sans" fo:font-size="13pt" officeooo:rsid="00665d81" style:font-size-asian="13pt" style:font-size-complex="13pt"/>
    </style:style>
    <style:style style:name="T60" style:family="text">
      <style:text-properties officeooo:rsid="0069e62c"/>
    </style:style>
    <style:style style:name="T61" style:family="text">
      <style:text-properties fo:color="#ff0000" loext:opacity="100%" style:font-name="Liberation Sans" fo:font-size="13pt" fo:background-color="#ffff00" loext:char-shading-value="0" style:font-size-asian="13pt" style:font-size-complex="13pt"/>
    </style:style>
    <style:style style:name="T62" style:family="text">
      <style:text-properties style:font-name="Liberation Sans" fo:font-size="13pt" officeooo:rsid="00288ae6" style:font-size-asian="13pt" style:font-size-complex="13pt"/>
    </style:style>
    <style:style style:name="T63" style:family="text">
      <style:text-properties style:font-name="Liberation Sans" fo:font-size="13pt" officeooo:rsid="00675365" style:font-size-asian="13pt" style:font-size-complex="13pt"/>
    </style:style>
    <style:style style:name="T64" style:family="text">
      <style:text-properties style:font-name="Liberation Sans" fo:font-size="13pt" officeooo:rsid="006c296a" style:font-size-asian="13pt" style:font-size-complex="13pt"/>
    </style:style>
    <style:style style:name="T65" style:family="text">
      <style:text-properties style:font-name="Liberation Sans" fo:font-size="13pt" officeooo:rsid="006d8eb6" style:font-size-asian="13pt" style:font-size-complex="13pt"/>
    </style:style>
    <style:style style:name="T66" style:family="text">
      <style:text-properties style:font-name="Liberation Sans" fo:font-size="13pt" officeooo:rsid="0077424b" style:font-size-asian="13pt" style:font-size-complex="13pt"/>
    </style:style>
    <style:style style:name="T67" style:family="text">
      <style:text-properties style:font-name="Liberation Sans" fo:font-size="13pt" officeooo:rsid="006b6527" style:font-size-asian="13pt" style:font-size-complex="13pt"/>
    </style:style>
    <style:style style:name="T68" style:family="text">
      <style:text-properties style:font-name="Liberation Sans" fo:font-size="13pt" officeooo:rsid="006b7fc8" style:font-size-asian="13pt" style:font-size-complex="13pt"/>
    </style:style>
    <style:style style:name="T69" style:family="text">
      <style:text-properties officeooo:rsid="006e0882"/>
    </style:style>
    <style:style style:name="T70" style:family="text">
      <style:text-properties officeooo:rsid="0078476e"/>
    </style:style>
    <style:style style:name="T71" style:family="text">
      <style:text-properties style:font-name="Liberation Sans" fo:font-size="13pt" officeooo:rsid="006e0882" style:font-size-asian="13pt" style:font-size-complex="13pt"/>
    </style:style>
    <style:style style:name="T72" style:family="text">
      <style:text-properties style:use-window-font-color="true" loext:opacity="0%" style:font-name="Liberation Sans" fo:font-size="13pt" fo:font-weight="normal" officeooo:rsid="006e0882" style:font-size-asian="13pt" style:font-weight-asian="normal" style:font-size-complex="13pt" style:font-weight-complex="normal"/>
    </style:style>
    <style:style style:name="T73" style:family="text">
      <style:text-properties style:use-window-font-color="true" loext:opacity="0%" style:font-name="Liberation Sans" fo:font-size="13pt" fo:font-weight="normal" officeooo:rsid="006f471c" style:font-size-asian="13pt" style:font-weight-asian="normal" style:font-size-complex="13pt" style:font-weight-complex="normal"/>
    </style:style>
    <style:style style:name="T74" style:family="text">
      <style:text-properties style:use-window-font-color="true" loext:opacity="0%" style:font-name="Liberation Sans" fo:font-size="13pt" fo:font-weight="normal" officeooo:rsid="006ee310" style:font-size-asian="13pt" style:font-weight-asian="normal" style:font-size-complex="13pt" style:font-weight-complex="normal"/>
    </style:style>
    <style:style style:name="T75" style:family="text">
      <style:text-properties style:use-window-font-color="true" loext:opacity="0%" style:font-name="Liberation Sans" fo:font-size="13pt" fo:font-weight="normal" officeooo:rsid="007a1363" style:font-size-asian="13pt" style:font-weight-asian="normal" style:font-size-complex="13pt" style:font-weight-complex="normal"/>
    </style:style>
    <style:style style:name="T76" style:family="text">
      <style:text-properties style:use-window-font-color="true" loext:opacity="0%" style:font-name="Liberation Sans" fo:font-size="13pt" fo:font-weight="normal" officeooo:rsid="007b84e1" style:font-size-asian="13pt" style:font-weight-asian="normal" style:font-size-complex="13pt" style:font-weight-complex="normal"/>
    </style:style>
    <style:style style:name="T77" style:family="text">
      <style:text-properties style:use-window-font-color="true" loext:opacity="0%" style:font-name="Liberation Sans" fo:font-size="13pt" fo:font-weight="normal" officeooo:rsid="009fe914" style:font-size-asian="13pt" style:font-weight-asian="normal" style:font-size-complex="13pt" style:font-weight-complex="normal"/>
    </style:style>
    <style:style style:name="T78" style:family="text">
      <style:text-properties style:use-window-font-color="true" loext:opacity="0%" fo:font-weight="normal" officeooo:rsid="006ee310" style:font-weight-asian="normal" style:font-weight-complex="normal"/>
    </style:style>
    <style:style style:name="T79" style:family="text">
      <style:text-properties style:use-window-font-color="true" loext:opacity="0%" fo:font-weight="normal" style:font-weight-asian="normal" style:font-weight-complex="normal"/>
    </style:style>
    <style:style style:name="T80" style:family="text">
      <style:text-properties style:use-window-font-color="true" loext:opacity="0%" fo:font-weight="normal" officeooo:rsid="007e343c" style:font-weight-asian="normal" style:font-weight-complex="normal"/>
    </style:style>
    <style:style style:name="T81" style:family="text">
      <style:text-properties style:use-window-font-color="true" loext:opacity="0%" fo:font-weight="normal" officeooo:rsid="00a1adb0" style:font-weight-asian="normal" style:font-weight-complex="normal"/>
    </style:style>
    <style:style style:name="T82" style:family="text">
      <style:text-properties fo:color="#ff0000" loext:opacity="100%" style:font-name="Liberation Sans" fo:font-size="13pt" style:font-size-asian="13pt" style:font-size-complex="13pt"/>
    </style:style>
    <style:style style:name="T83" style:family="text">
      <style:text-properties officeooo:rsid="002982d2"/>
    </style:style>
    <style:style style:name="T84" style:family="text">
      <style:text-properties officeooo:rsid="002ea812"/>
    </style:style>
    <style:style style:name="T85" style:family="text">
      <style:text-properties officeooo:rsid="0034c1d6"/>
    </style:style>
    <style:style style:name="T86" style:family="text">
      <style:text-properties officeooo:rsid="00514120"/>
    </style:style>
    <style:style style:name="T87" style:family="text">
      <style:text-properties fo:font-weight="normal" style:font-weight-asian="normal" style:font-weight-complex="normal"/>
    </style:style>
    <style:style style:name="T88" style:family="text">
      <style:text-properties fo:font-weight="normal" officeooo:rsid="00727d47" style:font-weight-asian="normal" style:font-weight-complex="normal"/>
    </style:style>
    <style:style style:name="T89" style:family="text">
      <style:text-properties officeooo:rsid="00370a82"/>
    </style:style>
    <style:style style:name="T90" style:family="text">
      <style:text-properties officeooo:rsid="00361aaf"/>
    </style:style>
    <style:style style:name="T91" style:family="text">
      <style:text-properties officeooo:rsid="00518bb6"/>
    </style:style>
    <style:style style:name="T92" style:family="text">
      <style:text-properties officeooo:rsid="003d232d"/>
    </style:style>
    <style:style style:name="T93" style:family="text">
      <style:text-properties officeooo:rsid="002ebce0"/>
    </style:style>
    <style:style style:name="T94" style:family="text">
      <style:text-properties officeooo:rsid="002fa837"/>
    </style:style>
    <style:style style:name="T95" style:family="text">
      <style:text-properties style:font-name="Liberation Sans" fo:font-size="13pt" officeooo:rsid="0030fe49" style:font-size-asian="13pt" style:font-size-complex="13pt"/>
    </style:style>
    <style:style style:name="T96" style:family="text">
      <style:text-properties officeooo:rsid="004115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brews 12:26</text:span><text:span text:style-name="T2">b</text:span><text:span text:style-name="T1">-27</text:span><text:line-break/>but now he hath promised, saying, Yet once more I shake not the earth only, but also heaven. [<text:span text:style-name="T3">27</text:span>] And this word, Yet once more, signifieth the removing of those things that are shaken, as of things that are made, that those things which cannot be shaken may remain.<text:line-break/></text:p>
      <text:list text:style-name="L1">
        <text:list-item>
          <text:p text:style-name="P2"><text:span text:style-name="T4">Hebrews chapter 11 is sometimes referred to as “the hall of faith” because it not only defines what faith is (</text:span><text:span text:style-name="T5">Heb. 11:1-3</text:span><text:span text:style-name="T4">) but it also </text:span><text:span text:style-name="T6">shows what faith looks like using</text:span><text:span text:style-name="T4"> </text:span><text:span text:style-name="T6">named e</text:span><text:span text:style-name="T4">xamples of people we can read about in the bible </text:span><text:span text:style-name="T7">(</text:span><text:span text:style-name="T5">Heb. 11:4-35</text:span><text:span text:style-name="T7">) </text:span><text:span text:style-name="T4">and </text:span><text:span text:style-name="T8">also </text:span><text:span text:style-name="T4">unnamed people who suffered grievously </text:span><text:span text:style-name="T7">(</text:span><text:span text:style-name="T5">Heb. 11:36-38</text:span><text:span text:style-name="T7">).</text:span><text:span text:style-name="T4"> </text:span><text:span text:style-name="T9">One of the many things we can learn from Hebrews 11 is that no matter what is going on and what things look like – </text:span><text:span text:style-name="T10">keep</text:span><text:span text:style-name="T9"> your faith in God.</text:span></text:p>
        </text:list-item>
      </text:list>
      <text:p text:style-name="P3"/>
      <table:table table:name="Table17" table:style-name="Table17">
        <table:table-column table:style-name="Table17.A"/>
        <table:table-row>
          <table:table-cell table:style-name="Table17.A1" office:value-type="string">
            <text:p text:style-name="P4"><text:span text:style-name="T3">1 Peter 2:19-20</text:span><text:line-break/>For this is thankworthy, if a man for conscience toward God endure grief, suffering wrongfully. [<text:span text:style-name="T3">20</text:span>] For what glory is it, if, when ye be buffeted for your faults, ye shall take it patiently? but if, <text:span text:style-name="T11">when ye do well, and suffer for it, ye take it patiently, this is acceptable with God</text:span>.</text:p>
          </table:table-cell>
        </table:table-row>
      </table:table>
      <text:p text:style-name="P3"/>
      <text:p text:style-name="P5">Hebrews 11:6 teaches us that it is impossible to please God without faith.</text:p>
      <table:table table:name="Table2" table:style-name="Table2">
        <table:table-column table:style-name="Table2.A"/>
        <table:table-row>
          <table:table-cell table:style-name="Table2.A1" office:value-type="string">
            <text:p text:style-name="Table_20_Contents"><text:span text:style-name="T5">Hebrews 11:6</text:span><text:span text:style-name="T12"><text:line-break/>But </text:span><text:span text:style-name="T13">without faith it is impossible to please him</text:span><text:span text:style-name="T12">: for he that cometh to God must believe that he is, and that he is a rewarder of them that diligently seek him.</text:span></text:p>
          </table:table-cell>
        </table:table-row>
      </table:table>
      <text:p text:style-name="P6"/>
      <text:p text:style-name="P7">We learn <text:span text:style-name="T14">more details</text:span> about <text:span text:style-name="T15">the people mentioned in the “hall of faith” </text:span><text:span text:style-name="T14">in Hebrews 11</text:span><text:span text:style-name="T15">.</text:span></text:p>
      <table:table table:name="Table18" table:style-name="Table18">
        <table:table-column table:style-name="Table18.A"/>
        <table:table-row>
          <table:table-cell table:style-name="Table18.A1" office:value-type="string">
            <text:p text:style-name="P4"><text:span text:style-name="T3">Hebrews 11:4<text:line-break/></text:span><text:span text:style-name="T16">By faith </text:span><text:span text:style-name="T17">Abel</text:span><text:span text:style-name="T16"> offered unto God a more excellent sacrifice than Cain, by which he obtained witness that he was righteous, God testifying of his gifts: and by it </text:span><text:span text:style-name="T17">he being dead yet speaketh</text:span><text:span text:style-name="T16">.<text:line-break/></text:span></text:p>
            <text:p text:style-name="P4"><text:span text:style-name="T16">Hebrews 11:7<text:line-break/>By faith </text:span><text:span text:style-name="T17">Noah</text:span><text:span text:style-name="T16">, being warned of God of things not seen as yet, moved with fear, prepared an ark to the saving of his house; by the which </text:span><text:span text:style-name="T17">he condemned the world</text:span><text:span text:style-name="T16">, and </text:span><text:span text:style-name="T17">became heir of the righteousness which is by faith</text:span><text:span text:style-name="T16">.</text:span></text:p>
            <text:p text:style-name="P4"><text:span text:style-name="T16"/></text:p>
            <text:p text:style-name="P4"><text:span text:style-name="T3">Hebrews 11:11<text:line-break/></text:span><text:span text:style-name="T16">Through faith also </text:span><text:span text:style-name="T17">Sara</text:span><text:span text:style-name="T16"> herself received strength to conceive seed, and was delivered of a child when she was past age, because </text:span><text:span text:style-name="T17">she judged him faithful who had promised</text:span><text:span text:style-name="T16">.<text:line-break/></text:span></text:p>
            <text:p text:style-name="P4"><text:span text:style-name="T3">Hebrews 11:17-19</text:span><text:line-break/>By faith <text:span text:style-name="T11">Abraham</text:span>, when he was tried, offered up Isaac: and he that had received the promises offered up his only begotten son, [<text:span text:style-name="T3">18</text:span>] Of whom it was said, That in Isaac shall thy seed be called: [<text:span text:style-name="T3">19</text:span>] <text:span text:style-name="T11">Accounting that God was able to raise him up, even from the dead</text:span>; from whence also he received him in a figure.</text:p>
            <text:p text:style-name="P4"/>
            <text:p text:style-name="P4"><text:span text:style-name="T3">Hebrews 11:24-27</text:span><text:line-break/>By faith <text:span text:style-name="T11">Moses</text:span>, when he was come to years, refused to be called the son of Pharaoh's daughter; [<text:span text:style-name="T3">25</text:span>] Choosing rather to suffer affliction with the people of God, than to enjoy the pleasures of sin for a season; [<text:span text:style-name="T3">26</text:span>] <text:span text:style-name="T11">Esteeming the reproach of Christ greater riches than the treasures in Egypt:</text:span> for he had respect unto the recompence of the reward. [<text:span text:style-name="T3">27</text:span>] By faith he forsook Egypt, not fearing the wrath of the king: for he endured, as seeing him who is invisible.</text:p>
          </table:table-cell>
        </table:table-row>
      </table:table>
      <text:p text:style-name="P6"/>
      <text:p text:style-name="P8"/>
      <text:p text:style-name="P8"><text:soft-page-break/>Verses 25-27 are all one sentence.</text:p>
      <table:table table:name="Table13" table:style-name="Table13">
        <table:table-column table:style-name="Table13.A"/>
        <table:table-row>
          <table:table-cell table:style-name="Table13.A1" office:value-type="string">
            <text:p text:style-name="P9"><text:span text:style-name="T5">Hebrews 12:25-27</text:span><text:span text:style-name="T12"><text:line-break/>See that ye refuse not him that speaketh. For if they escaped not who refused him that spake on earth, much more shall not we escape, if we turn away from him that speaketh from heaven: [</text:span><text:span text:style-name="T5">26</text:span><text:span text:style-name="T12">] Whose voice then shook the earth: but now he hath promised, saying, Yet once more I shake not the earth only, but also heaven. [</text:span><text:span text:style-name="T5">27</text:span><text:span text:style-name="T12">] And this word, Yet once more, signifieth the removing of those things that are shaken, as of things that are made, that those things which cannot be shaken may remain.</text:span></text:p>
          </table:table-cell>
        </table:table-row>
      </table:table>
      <text:p text:style-name="P10"/>
      <text:p text:style-name="P11">Back to the beginning of chapter 12.</text:p>
      <table:table table:name="Table1" table:style-name="Table1">
        <table:table-column table:style-name="Table1.A"/>
        <table:table-row>
          <table:table-cell table:style-name="Table1.A1" office:value-type="string">
            <text:p text:style-name="Table_20_Contents"><text:span text:style-name="T5">Hebrews 12:1-3</text:span><text:span text:style-name="T12"><text:line-break/>Wherefore seeing we also are compassed about with so great a cloud of witnesses, let us lay aside every weight, and the sin which doth so easily beset us, and let us run with patience the race that is set before us, [</text:span><text:span text:style-name="T5">2</text:span><text:span text:style-name="T12">] Looking unto Jesus the author and finisher of our faith; who for the joy that was set before him endured the cross, despising the shame, and is set down at the right hand of the throne of God. [</text:span><text:span text:style-name="T5">3</text:span><text:span text:style-name="T12">] For consider him that endured such contradiction of sinners against himself, lest ye be wearied and faint in your minds.</text:span></text:p>
          </table:table-cell>
        </table:table-row>
      </table:table>
      <text:p text:style-name="P1"/>
      <text:list text:style-name="L2">
        <text:list-item>
          <text:p text:style-name="P12"><text:span text:style-name="T18">Among other things Hebrews 12 is an exhortation to persevere in faith </text:span><text:span text:style-name="T19">just like those examples that were given in the previous chapter. </text:span><text:span text:style-name="T18">Hebrews 12 begins with an exhortation to look to Jesus </text:span><text:span text:style-name="T20">and consider what He endured to avoid being wearied or faint </text:span><text:span text:style-name="T21">(discouraged or depressed).</text:span></text:p>
        </text:list-item>
      </text:list>
      <text:p text:style-name="P13"/>
      <text:p text:style-name="P14">We are encouraged to appreciate the chastening of the Lord.</text:p>
      <table:table table:name="Table3" table:style-name="Table3">
        <table:table-column table:style-name="Table3.A"/>
        <table:table-row>
          <table:table-cell table:style-name="Table3.A1" office:value-type="string">
            <text:p text:style-name="Table_20_Contents"><text:span text:style-name="T5">Hebrews 12:4-11</text:span><text:span text:style-name="T12"><text:line-break/>Ye have not yet resisted unto blood, striving against sin. [</text:span><text:span text:style-name="T5">5</text:span><text:span text:style-name="T12">] And ye have forgotten the exhortation which speaketh unto you as unto children, My son, </text:span><text:span text:style-name="T13">despise not thou the chastening of the Lord, nor faint when thou art rebuked of him</text:span><text:span text:style-name="T12">: [</text:span><text:span text:style-name="T5">6</text:span><text:span text:style-name="T12">] </text:span><text:span text:style-name="T13">For whom the Lord loveth he chasteneth</text:span><text:span text:style-name="T12">, and scourgeth every son whom he receiveth. [</text:span><text:span text:style-name="T5">7</text:span><text:span text:style-name="T12">] If ye endure chastening, God dealeth with you as with sons; for what son is he whom the father chasteneth not? [</text:span><text:span text:style-name="T5">8</text:span><text:span text:style-name="T12">] But if ye be without chastisement, whereof all are partakers, then are ye bastards, and not sons. [</text:span><text:span text:style-name="T5">9</text:span><text:span text:style-name="T12">] Furthermore we have had fathers of our flesh which corrected us, and we gave them reverence: shall we not much rather be in subjection unto the Father of spirits, and live? [</text:span><text:span text:style-name="T5">10</text:span><text:span text:style-name="T12">] For they verily for a few days chastened us after their own pleasure; but he for our profit, that we might be partakers of his holiness. [</text:span><text:span text:style-name="T5">11</text:span><text:span text:style-name="T12">] Now no chastening for the present seemeth to be joyous, but grievous: nevertheless afterward it yieldeth the peaceable fruit of righteousness unto them which are exercised thereby.</text:span></text:p>
          </table:table-cell>
        </table:table-row>
      </table:table>
      <text:p text:style-name="P15"/>
      <text:p text:style-name="P16"><text:span text:style-name="T22">Among other things </text:span><text:span text:style-name="T5">Hebews 12:4-11</text:span><text:span text:style-name="T22"> </text:span><text:span text:style-name="T23">tells</text:span><text:span text:style-name="T22"> us to not be discouraged and to endure when the Lord chastens (educates or disciplines) us and compares the correction of our earthy fathers to the correct</text:span><text:span text:style-name="T24">ion</text:span><text:span text:style-name="T22"> of the Lord. Earthy fathers chasten us for “their own pleasure” but the Lord chastens us “for our profit, that we m</text:span><text:span text:style-name="T24">ight</text:span><text:span text:style-name="T22"> be partakers of </text:span><text:span text:style-name="T24">h</text:span><text:span text:style-name="T22">is holiness.” </text:span><text:span text:style-name="T25">This exhortation may seem out of place unless you consider not only what Jesus endured but also the chastening of Israel in the old testament. </text:span><text:span text:style-name="T26">On many occasions</text:span><text:span text:style-name="T25"> it was </text:span><text:span text:style-name="T27">their circumstances that </text:span><text:span text:style-name="T28">were</text:span><text:span text:style-name="T27"> the chastening of the Lord</text:span><text:span text:style-name="T25">. One </text:span><text:span text:style-name="T29">common </text:span><text:span text:style-name="T25">example </text:span><text:span text:style-name="T30">in the book of </text:span><text:span text:style-name="T5">Judges</text:span><text:span text:style-name="T30"> </text:span><text:span text:style-name="T29">is</text:span><text:span text:style-name="T25"> when Israel forsook God and worshiped other </text:span><text:span text:style-name="T29">gods</text:span><text:span text:style-name="T25"> in the promised land, how did the Lord chasten them and bring them back to Him? He raised up other nations that prevailed against Israel </text:span><text:span text:style-name="T31">(they attacked and won)</text:span><text:span text:style-name="T25">. </text:span><text:span text:style-name="T30">The circumstance that they found themselves in caused them to turn back to and cry out to God and then what was God’s response? He delivered them. In doing so, Israel was “corrected” </text:span><text:span text:style-name="T32">(chastened).</text:span></text:p>
      <text:p text:style-name="P17"/>
      <table:table table:name="Table19" table:style-name="Table19">
        <table:table-column table:style-name="Table19.A"/>
        <text:soft-page-break/>
        <table:table-row>
          <table:table-cell table:style-name="Table19.A1" office:value-type="string">
            <text:p text:style-name="P18">Mal<text:span text:style-name="T33">achi</text:span> 3:6<text:span text:style-name="T33">a,6b</text:span></text:p>
            <text:p text:style-name="P19">For I am the Lord, I change not;</text:p>
          </table:table-cell>
        </table:table-row>
      </table:table>
      <text:p text:style-name="P20"/>
      <text:p text:style-name="P20">God does not change, <text:span text:style-name="T34">and </text:span>so it’s important before complaining about our circumstances to consider: is this the chastening of the Lord? <text:span text:style-name="T33">Is the Lord trying to get my attention </text:span><text:span text:style-name="T35">or teach me something?</text:span><text:span text:style-name="T33"> </text:span><text:span text:style-name="T36">If so, why?</text:span></text:p>
      <text:p text:style-name="P20"/>
      <text:p text:style-name="P21">He does not afflict us willingly.</text:p>
      <table:table table:name="Table14" table:style-name="Table14">
        <table:table-column table:style-name="Table14.A"/>
        <table:table-row>
          <table:table-cell table:style-name="Table14.A1" office:value-type="string">
            <text:p text:style-name="Table_20_Contents"><text:span text:style-name="T5">Lamentations 3:31-33</text:span><text:span text:style-name="T12"><text:line-break/>For the Lord will not cast off for ever: [</text:span><text:span text:style-name="T5">32</text:span><text:span text:style-name="T12">] But though he cause grief, yet will he have compassion according to the multitude of his mercies. [</text:span><text:span text:style-name="T5">33</text:span><text:span text:style-name="T12">] For he doth not afflict willingly nor grieve the children of men.</text:span></text:p>
          </table:table-cell>
        </table:table-row>
      </table:table>
      <text:p text:style-name="P22"/>
      <text:p text:style-name="P23">Continuing chapter 12.</text:p>
      <table:table table:name="Table4" table:style-name="Table4">
        <table:table-column table:style-name="Table4.A"/>
        <table:table-row>
          <table:table-cell table:style-name="Table4.A1" office:value-type="string">
            <text:p text:style-name="Table_20_Contents"><text:span text:style-name="T5">Hebrews 12:12-17</text:span><text:span text:style-name="T12"><text:line-break/>Wherefore lift up the hands which hang down, and the feeble knees; [</text:span><text:span text:style-name="T5">13</text:span><text:span text:style-name="T12">] And make straight paths for your feet, lest that which is lame be turned out of the way; but let it rather be healed. [</text:span><text:span text:style-name="T5">14</text:span><text:span text:style-name="T12">] Follow</text:span><text:span text:style-name="T37">(pursue!)</text:span><text:span text:style-name="T12"> peace with all men, and holiness, without which no man shall see the Lord: [</text:span><text:span text:style-name="T5">15</text:span><text:span text:style-name="T12">] Looking diligently lest any man fail of the grace of God; lest any root of bitterness springing up trouble you, and thereby many be defiled; [</text:span><text:span text:style-name="T5">16</text:span><text:span text:style-name="T12">] Lest there be any fornicator, or profane person, as Esau, who for one morsel of meat sold his birthright. [</text:span><text:span text:style-name="T5">17</text:span><text:span text:style-name="T12">] For ye know how that afterward, when he would have inherited the blessing, he was rejected: for he found no place of repentance, though he sought it carefully with tears.</text:span></text:p>
          </table:table-cell>
        </table:table-row>
      </table:table>
      <text:p text:style-name="P24"/>
      <text:list text:style-name="L3">
        <text:list-item>
          <text:p text:style-name="P25"><text:span text:style-name="T5">Hebrews 12:12-17</text:span><text:span text:style-name="T12"> follows with advice on what to do in our “spiritual marathon” referred to in verse 1 </text:span><text:span text:style-name="T38">in light of the previous exhortation.</text:span></text:p>
          <text:p text:style-name="P25"><text:span text:style-name="T38"/></text:p>
        </text:list-item>
      </text:list>
      <text:p text:style-name="P26"><text:span text:style-name="T5">Hebrews 12:18-24</text:span><text:span text:style-name="T39"> are all one sentence.</text:span></text:p>
      <table:table table:name="Table5" table:style-name="Table5">
        <table:table-column table:style-name="Table5.A"/>
        <table:table-row>
          <table:table-cell table:style-name="Table5.A1" office:value-type="string">
            <text:p text:style-name="Table_20_Contents"><text:span text:style-name="T5">Hebrews 12:18-24</text:span><text:span text:style-name="T12"><text:line-break/>For ye are not come unto the mount that might be touched, and that burned with fire, nor unto blackness, and darkness, and tempest, [</text:span><text:span text:style-name="T5">19</text:span><text:span text:style-name="T12">] And the sound of a trumpet, and the voice of words; which voice they that heard intreated that the word should not be spoken to them any more: [</text:span><text:span text:style-name="T5">20</text:span><text:span text:style-name="T12">] (For they could not endure that which was commanded, And if so much as a beast touch the mountain, it shall be stoned, or thrust through with a dart: [</text:span><text:span text:style-name="T5">21</text:span><text:span text:style-name="T12">] And so terrible was the sight, that Moses said, I exceedingly fear and quake:)</text:span><text:span text:style-name="T40">Exodus 20:18,19</text:span><text:span text:style-name="T12"> [</text:span><text:span text:style-name="T5">22</text:span><text:span text:style-name="T12">] But ye are come unto mount Sion, and unto the city of the living God, the heavenly Jerusalem, and to an innumerable company of angels, [</text:span><text:span text:style-name="T5">23</text:span><text:span text:style-name="T12">] To the general assembly and church of the firstborn, which are written in heaven, and to God the Judge of all, and to the spirits of just men made perfect, [</text:span><text:span text:style-name="T5">24</text:span><text:span text:style-name="T12">] And to Jesus the mediator of the new covenant, and to the blood of sprinkling, that speaketh better things than that of Abel.</text:span></text:p>
          </table:table-cell>
        </table:table-row>
      </table:table>
      <text:p text:style-name="P27"/>
      <table:table table:name="Table20" table:style-name="Table20">
        <table:table-column table:style-name="Table20.A"/>
        <table:table-row>
          <table:table-cell table:style-name="Table20.A1" office:value-type="string">
            <text:p text:style-name="P4"><text:span text:style-name="T3">Hebrews 4:16</text:span><text:line-break/>Let us therefore come boldly unto the throne of grace, that we may obtain mercy, and find grace to help in time of need.</text:p>
          </table:table-cell>
        </table:table-row>
      </table:table>
      <text:p text:style-name="P27"/>
      <text:list text:style-name="L4">
        <text:list-item>
          <text:p text:style-name="P28"><text:span text:style-name="T41">W</text:span>e don’t need to be afraid <text:span text:style-name="T42">to approach God like they were in the old testament. However, we do need to be mindful of who we are talking or praying to. He’s still the same God that struck fear into the hearts of many Hebrews </text:span><text:span text:style-name="T43">at Mt. Sinai </text:span><text:span text:style-name="T42">in order to help them to not sin (</text:span><text:span text:style-name="T44">Exodus 20:20</text:span><text:span text:style-name="T42">). </text:span><text:span text:style-name="T45">They were so afraid that they reacted by requesting that Moses mediate for them.</text:span></text:p>
        </text:list-item>
      </text:list>
      <text:p text:style-name="P29"><text:soft-page-break/><text:span text:style-name="T46">Continuing on and </text:span>“<text:span text:style-name="T46">z</text:span>ooming in” on the study verse.</text:p>
      <table:table table:name="Table6" table:style-name="Table6">
        <table:table-column table:style-name="Table6.A"/>
        <table:table-row>
          <table:table-cell table:style-name="Table6.A1" office:value-type="string">
            <text:p text:style-name="Table_20_Contents"><text:span text:style-name="T5">Hebrews 12:25-29</text:span><text:span text:style-name="T12"><text:line-break/>See that ye refuse not him that speaketh. For if they escaped not who refused him that spake on earth, much more shall not we escape, if we turn away from him that speaketh from heaven: [</text:span><text:span text:style-name="T5">26</text:span><text:span text:style-name="T12">] Whose voice then shook the earth: </text:span><text:span text:style-name="T13">but now he hath promised, saying, Yet once more I shake not the earth only, but also heaven.</text:span><text:span text:style-name="T12"> [</text:span><text:span text:style-name="T5">27</text:span><text:span text:style-name="T12">] And this word, Yet once more, signifieth the removing of those things that are shaken, as of things that are made, that those things which cannot be shaken may remain. [</text:span><text:span text:style-name="T5">28</text:span><text:span text:style-name="T12">] Wherefore we receiving a kingdom which cannot be moved, let us have grace, whereby we may serve God acceptably with reverence and godly fear: [</text:span><text:span text:style-name="T5">29</text:span><text:span text:style-name="T12">] For our God is a consuming fire.</text:span></text:p>
          </table:table-cell>
        </table:table-row>
      </table:table>
      <text:p text:style-name="P30"/>
      <text:list text:style-name="L5">
        <text:list-item>
          <text:p text:style-name="P31"><text:span text:style-name="T12">That same God now speaks to us from heaven and we are told to not refuse him and we are reminded of what happened to the Hebrews in the wilderness wanderings (</text:span><text:span text:style-name="T47">almost all of them</text:span><text:span text:style-name="T12"> wandered 40 years and did not enter into the promised land because of their sin).</text:span></text:p>
        </text:list-item>
        <text:list-item>
          <text:p text:style-name="P32"><text:span text:style-name="T5">Hebrews 12:26,27</text:span><text:span text:style-name="T48"> is a reference to </text:span><text:span text:style-name="T5">Haggai 2:6,7</text:span><text:span text:style-name="T49">.</text:span></text:p>
        </text:list-item>
      </text:list>
      <text:p text:style-name="P33"/>
      <table:table table:name="Table7" table:style-name="Table7">
        <table:table-column table:style-name="Table7.A"/>
        <table:table-row>
          <table:table-cell table:style-name="Table7.A1" office:value-type="string">
            <text:p text:style-name="Table_20_Contents"><text:span text:style-name="T5">Haggai 2:1-9</text:span><text:span text:style-name="T12"><text:line-break/>In the seventh month, in the one and twentieth day of the month, came the word of the LORD by the prophet Haggai, saying, [</text:span><text:span text:style-name="T5">2</text:span><text:span text:style-name="T12">] Speak now to Zerubbabel the son of Shealtiel, governor of Judah, and to Joshua the son of Josedech, the high priest, and to the residue of the people, saying, [</text:span><text:span text:style-name="T5">3</text:span><text:span text:style-name="T12">] Who is left among you that saw this house in her first glory?</text:span><text:span text:style-name="T50">(referring to the first temple, the one Solomon built)</text:span><text:span text:style-name="T12"> and how do ye see it now?</text:span><text:span text:style-name="T50">(it was destroyed by Babylon)</text:span><text:span text:style-name="T12"> is it not in your eyes in comparison of it as nothing? [</text:span><text:span text:style-name="T5">4</text:span><text:span text:style-name="T12">] Yet now be strong, O Zerubbabel, saith the LORD; and be strong, O Joshua, son of Josedech, the high priest; and be strong, all ye people of the land, saith the LORD, and work: for I am with you, saith the LORD of hosts: [</text:span><text:span text:style-name="T5">5</text:span><text:span text:style-name="T12">] According to the word that I covenanted with you when ye came out of Egypt, so my spirit remaineth among you: fear ye not. [</text:span><text:span text:style-name="T5">6</text:span><text:span text:style-name="T12">] </text:span><text:span text:style-name="T13">For thus saith the LORD of hosts; Yet once, it is a little while, and I will shake the heavens, and the earth, and the sea, and the dry land;</text:span><text:span text:style-name="T12"> [</text:span><text:span text:style-name="T5">7</text:span><text:span text:style-name="T12">] </text:span><text:span text:style-name="T13">And I will shake all nations, and the desire</text:span><text:span text:style-name="T51">(</text:span><text:span text:style-name="T52">delight</text:span><text:span text:style-name="T51">)</text:span><text:span text:style-name="T53"> </text:span><text:span text:style-name="T13">of all nations shall come: and I will fill this house with glory, saith the LORD of hosts.</text:span><text:span text:style-name="T12"> [</text:span><text:span text:style-name="T5">8</text:span><text:span text:style-name="T12">] The silver is mine, and the gold is mine, saith the LORD of hosts. [9] The glory of this latter house shall be greater than of the former, saith the LORD of hosts: and in this place will I give peace, saith the LORD of hosts.</text:span></text:p>
          </table:table-cell>
        </table:table-row>
      </table:table>
      <text:p text:style-name="P34"/>
      <text:list text:style-name="L6">
        <text:list-item>
          <text:p text:style-name="P35">Zerubbabel was among the returning captives after Persia conquered Babylon (of which the Hebrews were captives for 70 years).</text:p>
        </text:list-item>
        <text:list-item>
          <text:p text:style-name="P36">They are encouraged by God to work and build a new temple thus fulfilling the prophecy in <text:span text:style-name="T3">Daniel 9:25</text:span><text:span text:style-name="T16"> </text:span><text:span text:style-name="T54">(Daniel was a prophet during the Babylonian/Chaldean captivity).</text:span></text:p>
        </text:list-item>
        <text:list-item>
          <text:p text:style-name="P37"><text:span text:style-name="T55">The second temple was the temple that Jesus </text:span><text:span text:style-name="T56">and His disciples </text:span><text:span text:style-name="T55">visited and it stood until 70AD when it was destroyed by the Romans (which Jesus forewarned about in </text:span><text:span text:style-name="T57">Matthew 24:2</text:span><text:span text:style-name="T55">, </text:span><text:span text:style-name="T57">Mark 13:2</text:span><text:span text:style-name="T55">, </text:span><text:span text:style-name="T57">Luke 19:44</text:span><text:span text:style-name="T55">, and </text:span><text:span text:style-name="T57">Luke 21:6</text:span><text:span text:style-name="T55">).</text:span></text:p>
        </text:list-item>
      </text:list>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list text:continue-numbering="true" text:style-name="L6">
        <text:list-item>
          <text:p text:style-name="P39"><text:soft-page-break/><text:span text:style-name="T58">But, what </text:span><text:span text:style-name="T59">is</text:span><text:span text:style-name="T58"> this shaking </text:span><text:span text:style-name="T59">referring to exactly</text:span><text:span text:style-name="T58">? </text:span><text:span text:style-name="T5">Hebrews 12:26,27</text:span><text:span text:style-name="T58"> gives us some clues.</text:span></text:p>
        </text:list-item>
      </text:list>
      <text:p text:style-name="P40"/>
      <table:table table:name="Table8" table:style-name="Table8">
        <table:table-column table:style-name="Table8.A"/>
        <table:table-row>
          <table:table-cell table:style-name="Table8.A1" office:value-type="string">
            <text:p text:style-name="Table_20_Contents"><text:span text:style-name="T5">Hebrews 12:26,27</text:span><text:span text:style-name="T12"><text:line-break/>Whose voice then shook the earth: but now he hath promised, saying, Yet once more I shake not the earth only, but also heaven. [</text:span><text:span text:style-name="T5">27</text:span><text:span text:style-name="T12">] And this word, Yet once more, signifieth </text:span><text:span text:style-name="T13">the removing of those things</text:span><text:span text:style-name="T12"> that are shaken, as of things </text:span><text:span text:style-name="T13">that are made</text:span><text:span text:style-name="T12">, that those things which cannot be shaken may remain.</text:span></text:p>
          </table:table-cell>
        </table:table-row>
      </table:table>
      <text:p text:style-name="P41"/>
      <table:table table:name="Table15" table:style-name="Table15">
        <table:table-column table:style-name="Table15.A"/>
        <table:table-row>
          <table:table-cell table:style-name="Table15.A1" office:value-type="string">
            <text:p text:style-name="Table_20_Contents"><text:span text:style-name="T5">2 Corinthians 4:18</text:span><text:span text:style-name="T12"><text:line-break/>While we look not at the things which are seen, but at the things which are not seen: for </text:span><text:span text:style-name="T13">the things which are seen are temporal</text:span><text:span text:style-name="T12">; but </text:span><text:span text:style-name="T13">the things which are not seen are eternal</text:span><text:span text:style-name="T12">.</text:span></text:p>
          </table:table-cell>
        </table:table-row>
      </table:table>
      <text:p text:style-name="P41"/>
      <text:list text:style-name="L7">
        <text:list-item>
          <text:p text:style-name="P42">The things which are seen are physical and temporary, the things which are not seen are spiritual and eternal.</text:p>
        </text:list-item>
      </text:list>
      <text:p text:style-name="P43"/>
      <text:p text:style-name="P44">The first <text:span text:style-name="T60">of three </text:span>biblical reference<text:span text:style-name="T60">s</text:span> to a new heaven and a new earth <text:span text:style-name="T60">occurs</text:span> in Isaiah.</text:p>
      <table:table table:name="Table10" table:style-name="Table10">
        <table:table-column table:style-name="Table10.A"/>
        <table:table-row>
          <table:table-cell table:style-name="Table10.A1" office:value-type="string">
            <text:p text:style-name="P45"><text:span text:style-name="T5">Isaiah 65:17</text:span><text:span text:style-name="T12"><text:line-break/>For, behold, </text:span><text:span text:style-name="T13">I create new heavens and a new earth</text:span><text:span text:style-name="T12">: and the former shall not be remembered, nor come into mind.</text:span></text:p>
            <text:p text:style-name="P46">...</text:p>
            <text:p text:style-name="P45"><text:span text:style-name="T5">Isaiah 66:22</text:span><text:span text:style-name="T12"><text:line-break/>For as </text:span><text:span text:style-name="T13">the new heavens and the new earth, which I will make</text:span><text:span text:style-name="T12">, shall remain before me, saith the LORD, so shall your seed and your name remain.</text:span></text:p>
          </table:table-cell>
        </table:table-row>
      </table:table>
      <text:p text:style-name="P47"/>
      <text:p text:style-name="P48">The third (in book order) occurs in Revelation.</text:p>
      <table:table table:name="Table11" table:style-name="Table11">
        <table:table-column table:style-name="Table11.A"/>
        <table:table-row>
          <table:table-cell table:style-name="Table11.A1" office:value-type="string">
            <text:p text:style-name="P45"><text:span text:style-name="T5">Revelation 21:1-5</text:span><text:span text:style-name="T12"><text:line-break/>And I saw </text:span><text:span text:style-name="T13">a new heaven</text:span><text:span text:style-name="T12"> and </text:span><text:span text:style-name="T13">a new earth</text:span><text:span text:style-name="T12">: for </text:span><text:span text:style-name="T13">the first heaven</text:span><text:span text:style-name="T12"> and </text:span><text:span text:style-name="T13">the first earth were passed away</text:span><text:span text:style-name="T12">; and there was no more sea. [</text:span><text:span text:style-name="T5">2</text:span><text:span text:style-name="T12">] And I John saw the holy city, new Jerusalem, coming down from God out of heaven, prepared as a bride adorned for her husband. [</text:span><text:span text:style-name="T5">3</text:span><text:span text:style-name="T12">] And I heard a great voice out of heaven saying, Behold, the tabernacle of God is with men, and he will dwell with them, and they shall be his people, and God himself shall be with them, and be their God. [</text:span><text:span text:style-name="T5">4</text:span><text:span text:style-name="T12">] And God shall wipe away all tears from their eyes; and there shall be no more death, neither sorrow, nor crying, neither shall there be any more pain: for </text:span><text:span text:style-name="T13">the former things are passed away</text:span><text:span text:style-name="T12">. [</text:span><text:span text:style-name="T5">5</text:span><text:span text:style-name="T12">] And he that sat upon the throne said, </text:span><text:span text:style-name="T61">Behold, I make all things new</text:span><text:span text:style-name="T12">. And he said unto me, Write: for these words are true and faithful.</text:span></text:p>
          </table:table-cell>
        </table:table-row>
      </table:table>
      <text:p text:style-name="P48"/>
      <text:p text:style-name="P48">The second occurs in 2 Peter.</text:p>
      <table:table table:name="Table9" table:style-name="Table9">
        <table:table-column table:style-name="Table9.A"/>
        <table:table-row>
          <table:table-cell table:style-name="Table9.A1" office:value-type="string">
            <text:p text:style-name="Table_20_Contents"><text:span text:style-name="T5">2 Peter 3:10-13</text:span><text:span text:style-name="T12"><text:line-break/>But the day of the Lord will come as a thief in the night; in the which </text:span><text:span text:style-name="T13">the heavens shall pass away with a great noise, and the elements shall melt with fervent heat, the earth also and the works that are therein shall be burned up.</text:span><text:span text:style-name="T12"> [</text:span><text:span text:style-name="T5">11</text:span><text:span text:style-name="T12">] Seeing then that </text:span><text:span text:style-name="T13">all these things shall be dissolved</text:span><text:span text:style-name="T12">, what manner of persons ought ye to be in all holy conversation and godliness, [</text:span><text:span text:style-name="T5">12</text:span><text:span text:style-name="T12">] Looking for and hasting unto the coming of the day of God, wherein </text:span><text:span text:style-name="T13">the heavens being on fire shall be dissolved</text:span><text:span text:style-name="T12">, </text:span><text:span text:style-name="T13">and the elements shall melt with fervent heat?</text:span><text:span text:style-name="T12"> [</text:span><text:span text:style-name="T5">13</text:span><text:span text:style-name="T12">] Nevertheless </text:span><text:span text:style-name="T13">we, according to his promise, look for new heavens and a new earth</text:span><text:span text:style-name="T12">, wherein dwelleth righteousness.</text:span></text:p>
          </table:table-cell>
        </table:table-row>
      </table:table>
      <text:p text:style-name="P34"/>
      <text:list text:style-name="L8">
        <text:list-item>
          <text:p text:style-name="P49"><text:soft-page-break/><text:span text:style-name="T62">Before the new heavens and new earth </text:span><text:span text:style-name="T63">appear</text:span><text:span text:style-name="T62"> </text:span><text:span text:style-name="T64">the old things must “pass away” and </text:span><text:span text:style-name="T5">2 Peter 3:10-13</text:span><text:span text:style-name="T64"> </text:span><text:span text:style-name="T65">gives</text:span><text:span text:style-name="T64"> us more details as to how that will happen. </text:span><text:span text:style-name="T66">Take note also that </text:span><text:span text:style-name="T62">Heb</text:span><text:span text:style-name="T67">rews</text:span><text:span text:style-name="T62"> </text:span><text:span text:style-name="T68">chapter </text:span><text:span text:style-name="T62">12 </text:span><text:span text:style-name="T68">ends with </text:span><text:span text:style-name="T67">“</text:span><text:span text:style-name="T62">For our God is a consuming fire.”</text:span></text:p>
        </text:list-item>
      </text:list>
      <text:p text:style-name="P50"/>
      <text:list text:continue-numbering="true" text:style-name="L8">
        <text:list-item>
          <text:p text:style-name="P51">For this verse study it’s important to note from the verse above: “the earth also and the works that are therein shall be burned up” The question that immediately follows calls attention to that fact and causes us to consider a very important point: <text:span text:style-name="T69">Where should our focus of our life be in light of this knowledge?</text:span> Should we be pursuing earthly/physical/<text:span text:style-name="T69">temporary</text:span> things that will amount to nothing? Or, should we pursue the spiritual things which are eternal?</text:p>
        </text:list-item>
        <text:list-item>
          <text:p text:style-name="P52">Obviously, we need some of those physical/temporal things to get by – so then it naturally becomes <text:span text:style-name="T70">not about abstaining from them but instead about our </text:span>priorities.</text:p>
        </text:list-item>
        <text:list-item>
          <text:p text:style-name="P53"><text:span text:style-name="T71">Likewise, </text:span><text:span text:style-name="T5">Hebrews 12:26b-27</text:span><text:span text:style-name="T72"> </text:span><text:span text:style-name="T73">is</text:span><text:span text:style-name="T72"> a reminder of th</text:span><text:span text:style-name="T74">e brevity and temporary nature of the physical world that we see and the </text:span><text:span text:style-name="T75">works thereof </text:span><text:span text:style-name="T74">versus pursuing eternal things which are spiritual. It helps us to properly prioritize our lives in</text:span><text:span text:style-name="T76">to a</text:span><text:span text:style-name="T74"> meaningful manner as opposed to what the world teaches: </text:span><text:span text:style-name="T73">s</text:span><text:span text:style-name="T74">piritual/</text:span><text:span text:style-name="T77">eternal</text:span><text:span text:style-name="T74"> things come first, physical/</text:span><text:span text:style-name="T77">temporal</text:span><text:span text:style-name="T74"> things follow.</text:span></text:p>
        </text:list-item>
        <text:list-item>
          <text:p text:style-name="P52"><text:span text:style-name="T78">I</text:span><text:span text:style-name="T79">s there anywhere in your life where you are prioritizing temporal over eternal?</text:span></text:p>
        </text:list-item>
      </text:list>
      <text:p text:style-name="P54"><text:span text:style-name="T79"/></text:p>
      <text:p text:style-name="P55"><text:span text:style-name="T80">What </text:span><text:span text:style-name="T81">did</text:span><text:span text:style-name="T79"> Jesus say about th</text:span><text:span text:style-name="T80">is</text:span><text:span text:style-name="T79"> topic:</text:span></text:p>
      <table:table table:name="Table16" table:style-name="Table16">
        <table:table-column table:style-name="Table16.A"/>
        <table:table-row>
          <table:table-cell table:style-name="Table16.A1" office:value-type="string">
            <text:p text:style-name="Table_20_Contents"><text:span text:style-name="T5">Matthew 6:19-21</text:span><text:span text:style-name="T12"><text:line-break/></text:span><text:span text:style-name="T82">Lay not up for yourselves treasures upon earth, where moth and rust doth corrupt, and where thieves break through and steal:</text:span><text:span text:style-name="T12"> [</text:span><text:span text:style-name="T5">20</text:span><text:span text:style-name="T12">] </text:span><text:span text:style-name="T82">But lay up for yourselves treasures in heaven, where neither moth nor rust doth corrupt, and where thieves do not break through nor steal:</text:span><text:span text:style-name="T12"> [</text:span><text:span text:style-name="T5">21</text:span><text:span text:style-name="T12">] </text:span><text:span text:style-name="T82">For where your treasure is, there will your heart be also.</text:span></text:p>
          </table:table-cell>
        </table:table-row>
      </table:table>
      <text:p text:style-name="P56"><text:span text:style-name="T79"/></text:p>
      <text:p text:style-name="P50"/>
      <text:p text:style-name="P57"/>
      <text:p text:style-name="P58">Extra</text:p>
      <text:p text:style-name="P59"/>
      <text:p text:style-name="P57"><text:span text:style-name="T83">At some point in the future, </text:span><text:span text:style-name="T84">the following events will occur </text:span><text:span text:style-name="T85">(Revelation, Daniel, et. al)</text:span><text:span text:style-name="T84">:</text:span></text:p>
      <table:table table:name="Table12" table:style-name="Table12">
        <table:table-column table:style-name="Table12.A"/>
        <table:table-column table:style-name="Table12.B"/>
        <table:table-row>
          <table:table-cell table:style-name="Table12.A1" office:value-type="string">
            <text:p text:style-name="P60"><text:span text:style-name="T86">Biblical e</text:span>vent<text:span text:style-name="T87"> </text:span><text:span text:style-name="T88">(chronological order)</text:span></text:p>
          </table:table-cell>
          <table:table-cell table:style-name="Table12.B1" office:value-type="string">
            <text:p text:style-name="P61">Common name</text:p>
          </table:table-cell>
        </table:table-row>
        <table:table-row>
          <table:table-cell table:style-name="Table12.A2" office:value-type="string">
            <text:p text:style-name="P62">Christ returns with His holy angels and “harvests the earth”</text:p>
          </table:table-cell>
          <table:table-cell table:style-name="Table12.B2" office:value-type="string">
            <text:p text:style-name="P62">Rapture</text:p>
          </table:table-cell>
        </table:table-row>
        <table:table-row>
          <table:table-cell table:style-name="Table12.A2" office:value-type="string">
            <text:p text:style-name="P63">7 year period <text:span text:style-name="T89">when divine judgments, celestial disturbances, natural disasters, and terrible plagues come to pass (some will turn to the Lord and some will still refuse)</text:span></text:p>
          </table:table-cell>
          <table:table-cell table:style-name="Table12.B2" office:value-type="string">
            <text:p text:style-name="P64">Tribulation <text:span text:style-name="T90">(the tribulation and great tribulation </text:span><text:span text:style-name="T91">period </text:span><text:span text:style-name="T90">are evenly split at 3.5 years), </text:span><text:span text:style-name="T92">God’s wrath is poured upon the earth</text:span></text:p>
          </table:table-cell>
        </table:table-row>
        <table:table-row>
          <table:table-cell table:style-name="Table12.A2" office:value-type="string">
            <text:p text:style-name="P65">The “beast” is defeated by the Lamb, the Lord of lords, and King of kings. The “beast” and the false prophet are cast alive into the lake of fire burning with brimstone.</text:p>
          </table:table-cell>
          <table:table-cell table:style-name="Table12.B2" office:value-type="string">
            <text:p text:style-name="P66">The marriage supper of the Lamb</text:p>
          </table:table-cell>
        </table:table-row>
        <table:table-row>
          <table:table-cell table:style-name="Table12.A2" office:value-type="string">
            <text:p text:style-name="P67"><text:span text:style-name="T84">Satan is bound in the bottomless pit for 1,000 years and Jesus and </text:span><text:span text:style-name="T93">the</text:span><text:span text:style-name="T84"> saints </text:span><text:span text:style-name="T93">of the first resurrection </text:span><text:span text:style-name="T84">live and reign on the earth for </text:span>1,000 year<text:span text:style-name="T84">s</text:span></text:p>
          </table:table-cell>
          <table:table-cell table:style-name="Table12.B2" office:value-type="string">
            <text:p text:style-name="P68">Millennial kingdom</text:p>
          </table:table-cell>
        </table:table-row>
        <table:table-row>
          <table:table-cell table:style-name="Table12.A2" office:value-type="string">
            <text:p text:style-name="P69">After the millennial kingdom Satan is let loose for a short season, he again gathers the nations to do battle against the saints and the beloved city and <text:span text:style-name="T94">just after they encamp around the city</text:span> fire from heaven <text:span text:style-name="T94">comes down and </text:span>devours them</text:p>
          </table:table-cell>
          <table:table-cell table:style-name="Table12.B2" office:value-type="string">
            <text:p text:style-name="P70"/>
          </table:table-cell>
        </table:table-row>
        <table:table-row>
          <table:table-cell table:style-name="Table12.A2" office:value-type="string">
            <text:p text:style-name="P71">Great white throne judgment</text:p>
          </table:table-cell>
          <table:table-cell table:style-name="Table12.B2" office:value-type="string">
            <text:p text:style-name="P71">Final judgment</text:p>
          </table:table-cell>
        </table:table-row>
        <table:table-row>
          <table:table-cell table:style-name="Table12.A2" office:value-type="string">
            <text:p text:style-name="P72"><text:span text:style-name="T5">Revelation 21:1</text:span><text:span text:style-name="T95"><text:line-break/>And I saw a new heaven and a new earth: for the first heaven and the first earth were passed away; and there was no more sea.<text:line-break/></text:span></text:p>
            <text:p text:style-name="P72"><text:span text:style-name="T5">Revelation 21:5</text:span><text:span text:style-name="T95"><text:line-break/>And he that sat upon the throne said, Behold, I make all things new. And he said unto me, Write: for these words are true and faithful.</text:span></text:p>
          </table:table-cell>
          <table:table-cell table:style-name="Table12.B2" office:value-type="string">
            <text:p text:style-name="P73">The old heave<text:span text:style-name="T96">n</text:span> and earth are passed away and the new heaven and earth appears</text:p>
          </table:table-cell>
        </table:table-row>
      </table:table>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06T10:18:30.692000000</meta:creation-date>
    <dc:date>2026-07-11T12:21:10.909197872</dc:date>
    <meta:editing-duration>PT6H52M31S</meta:editing-duration>
    <meta:editing-cycles>164</meta:editing-cycles>
    <meta:generator>LibreOffice/26.2.4.2$Linux_X86_64 LibreOffice_project/64a984c51f4702dbd3710b13428c673a2f1292e7</meta:generator>
    <meta:document-statistic meta:table-count="20" meta:image-count="0" meta:object-count="0" meta:page-count="7" meta:paragraph-count="77" meta:word-count="3305" meta:character-count="18074" meta:non-whitespace-character-count="14856"/>
  </office:meta>
</office:document-meta>
</file>