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5in" table:align="margins"/>
    </style:style>
    <style:style style:name="Table3.A" style:family="table-column">
      <style:table-column-properties style:column-width="7.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7.5in" fo:break-before="page" table:align="margins"/>
    </style:style>
    <style:style style:name="Table4.A" style:family="table-column">
      <style:table-column-properties style:column-width="7.5in" style:rel-column-width="65535*"/>
    </style:style>
    <style:style style:name="Table4.A1" style:family="table-cell">
      <style:table-cell-properties fo:padding="0.0382in" fo:border="0.5pt solid #000000"/>
    </style:style>
    <style:style style:name="Table5" style:family="table">
      <style:table-properties style:width="7.5in" table:align="margins"/>
    </style:style>
    <style:style style:name="Table5.A" style:family="table-column">
      <style:table-column-properties style:column-width="7.5in" style:rel-column-width="65535*"/>
    </style:style>
    <style:style style:name="Table5.A1" style:family="table-cell">
      <style:table-cell-properties fo:padding="0.0382in" fo:border="0.5pt solid #000000"/>
    </style:style>
    <style:style style:name="Table6" style:family="table">
      <style:table-properties style:width="7.5in" table:align="margins"/>
    </style:style>
    <style:style style:name="Table6.A" style:family="table-column">
      <style:table-column-properties style:column-width="2.2292in" style:rel-column-width="19478*"/>
    </style:style>
    <style:style style:name="Table6.B" style:family="table-column">
      <style:table-column-properties style:column-width="1.5833in" style:rel-column-width="13835*"/>
    </style:style>
    <style:style style:name="Table6.C" style:family="table-column">
      <style:table-column-properties style:column-width="1.9375in" style:rel-column-width="16929*"/>
    </style:style>
    <style:style style:name="Table6.D" style:family="table-column">
      <style:table-column-properties style:column-width="1.75in" style:rel-column-width="15293*"/>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D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7.5in" table:align="margins"/>
    </style:style>
    <style:style style:name="Table2.A" style:family="table-column">
      <style:table-column-properties style:column-width="7.5in" style:rel-column-width="65535*"/>
    </style:style>
    <style:style style:name="Table2.A1" style:family="table-cell">
      <style:table-cell-properties fo:padding="0.0382in" fo:border="0.5pt solid #000000"/>
    </style:style>
    <style:style style:name="Table7" style:family="table">
      <style:table-properties style:width="7.5in" table:align="margins"/>
    </style:style>
    <style:style style:name="Table7.A" style:family="table-column">
      <style:table-column-properties style:column-width="3.75in" style:rel-column-width="32767*"/>
    </style:style>
    <style:style style:name="Table7.B" style:family="table-column">
      <style:table-column-properties style:column-width="3.75in" style:rel-column-width="3276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127622"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list-style-name="L1">
      <style:text-properties fo:font-size="13pt" officeooo:rsid="002c83b3" officeooo:paragraph-rsid="002c83b3" style:font-size-asian="13pt" style:font-size-complex="13pt"/>
    </style:style>
    <style:style style:name="P4" style:family="paragraph" style:parent-style-name="Standard">
      <style:text-properties fo:font-size="13pt" officeooo:rsid="002c83b3" officeooo:paragraph-rsid="002c83b3" style:font-size-asian="13pt" style:font-size-complex="13pt"/>
    </style:style>
    <style:style style:name="P5" style:family="paragraph" style:parent-style-name="Standard" style:list-style-name="L1">
      <style:text-properties fo:font-size="13pt" officeooo:rsid="00385f10" officeooo:paragraph-rsid="00385f10" style:font-size-asian="13pt" style:font-size-complex="13pt"/>
    </style:style>
    <style:style style:name="P6" style:family="paragraph" style:parent-style-name="Table_20_Contents">
      <style:text-properties fo:color="#127622" loext:opacity="100%" fo:font-size="13pt" officeooo:rsid="00237682" officeooo:paragraph-rsid="00237682" style:font-size-asian="13pt" style:font-size-complex="13pt"/>
    </style:style>
    <style:style style:name="P7" style:family="paragraph" style:parent-style-name="Standard">
      <style:text-properties fo:font-size="13pt" officeooo:paragraph-rsid="00237682" style:font-size-asian="13pt" style:font-size-complex="13pt"/>
    </style:style>
    <style:style style:name="P8" style:family="paragraph" style:parent-style-name="Table_20_Contents" style:list-style-name="L2">
      <style:text-properties fo:font-size="13pt" officeooo:rsid="00385f10" officeooo:paragraph-rsid="00385f10" style:font-size-asian="13pt" style:font-size-complex="13pt"/>
    </style:style>
    <style:style style:name="P9" style:family="paragraph" style:parent-style-name="Table_20_Contents" style:list-style-name="L2">
      <style:text-properties fo:font-size="13pt" officeooo:rsid="00d512cf" officeooo:paragraph-rsid="00d512cf" style:font-size-asian="13pt" style:font-size-complex="13pt"/>
    </style:style>
    <style:style style:name="P10" style:family="paragraph" style:parent-style-name="Table_20_Contents" style:list-style-name="L2">
      <style:text-properties fo:font-size="13pt" officeooo:rsid="003a4b46" officeooo:paragraph-rsid="003a4b46" style:font-size-asian="13pt" style:font-size-complex="13pt"/>
    </style:style>
    <style:style style:name="P11" style:family="paragraph" style:parent-style-name="Table_20_Contents" style:list-style-name="L2">
      <style:text-properties fo:font-size="13pt" officeooo:rsid="003baecc" officeooo:paragraph-rsid="003baecc" style:font-size-asian="13pt" style:font-size-complex="13pt"/>
    </style:style>
    <style:style style:name="P12" style:family="paragraph" style:parent-style-name="Table_20_Contents" style:list-style-name="L2">
      <style:text-properties fo:font-size="13pt" officeooo:rsid="004ad908" officeooo:paragraph-rsid="004ad908" style:font-size-asian="13pt" style:font-size-complex="13pt"/>
    </style:style>
    <style:style style:name="P13" style:family="paragraph" style:parent-style-name="Table_20_Contents">
      <style:text-properties fo:font-size="13pt" officeooo:rsid="00237682" officeooo:paragraph-rsid="00237682" style:font-size-asian="13pt" style:font-size-complex="13pt"/>
    </style:style>
    <style:style style:name="P14" style:family="paragraph" style:parent-style-name="Table_20_Contents">
      <style:text-properties fo:font-size="13pt" officeooo:rsid="003baecc" officeooo:paragraph-rsid="003baecc" style:font-size-asian="13pt" style:font-size-complex="13pt"/>
    </style:style>
    <style:style style:name="P15" style:family="paragraph" style:parent-style-name="Table_20_Contents" style:list-style-name="L3">
      <style:text-properties fo:font-size="13pt" officeooo:paragraph-rsid="003baecc" style:font-size-asian="13pt" style:font-size-complex="13pt"/>
    </style:style>
    <style:style style:name="P16" style:family="paragraph" style:parent-style-name="Table_20_Contents" style:list-style-name="L3">
      <style:text-properties fo:font-size="13pt" officeooo:rsid="003baecc" officeooo:paragraph-rsid="003baecc" style:font-size-asian="13pt" style:font-size-complex="13pt"/>
    </style:style>
    <style:style style:name="P17" style:family="paragraph" style:parent-style-name="Table_20_Contents" style:list-style-name="L3">
      <style:text-properties fo:font-size="13pt" officeooo:rsid="003c8154" officeooo:paragraph-rsid="003c8154" style:font-size-asian="13pt" style:font-size-complex="13pt"/>
    </style:style>
    <style:style style:name="P18" style:family="paragraph" style:parent-style-name="Table_20_Contents">
      <style:text-properties fo:font-size="13pt" officeooo:paragraph-rsid="003baecc" style:font-size-asian="13pt" style:font-size-complex="13pt"/>
    </style:style>
    <style:style style:name="P19" style:family="paragraph" style:parent-style-name="Table_20_Contents">
      <style:text-properties fo:font-size="13pt" officeooo:rsid="003d4fb0" officeooo:paragraph-rsid="00653ae5" style:font-size-asian="13pt" style:font-size-complex="13pt"/>
    </style:style>
    <style:style style:name="P20" style:family="paragraph" style:parent-style-name="Table_20_Contents">
      <style:text-properties fo:font-size="13pt" officeooo:paragraph-rsid="00653ae5" style:font-size-asian="13pt" style:font-size-complex="13pt"/>
    </style:style>
    <style:style style:name="P21" style:family="paragraph" style:parent-style-name="Table_20_Contents" style:list-style-name="L4">
      <style:text-properties fo:font-size="13pt" officeooo:rsid="004bf0f2" officeooo:paragraph-rsid="004bf0f2" style:font-size-asian="13pt" style:font-size-complex="13pt"/>
    </style:style>
    <style:style style:name="P22" style:family="paragraph" style:parent-style-name="Table_20_Contents" style:list-style-name="L4">
      <style:text-properties fo:font-size="13pt" officeooo:rsid="006dc5ad" officeooo:paragraph-rsid="006dc5ad" style:font-size-asian="13pt" style:font-size-complex="13pt"/>
    </style:style>
    <style:style style:name="P23" style:family="paragraph" style:parent-style-name="Table_20_Contents">
      <style:text-properties fo:font-size="13pt" officeooo:paragraph-rsid="004bf0f2" style:font-size-asian="13pt" style:font-size-complex="13pt"/>
    </style:style>
    <style:style style:name="P24" style:family="paragraph" style:parent-style-name="Table_20_Contents">
      <style:text-properties fo:font-size="13pt" officeooo:rsid="004bf0f2" officeooo:paragraph-rsid="004bf0f2" style:font-size-asian="13pt" style:font-size-complex="13pt"/>
    </style:style>
    <style:style style:name="P25" style:family="paragraph" style:parent-style-name="Table_20_Contents">
      <style:text-properties fo:font-size="13pt" officeooo:rsid="004bf0f2" officeooo:paragraph-rsid="006fbe79" style:font-size-asian="13pt" style:font-size-complex="13pt"/>
    </style:style>
    <style:style style:name="P26" style:family="paragraph" style:parent-style-name="Table_20_Contents">
      <style:text-properties fo:font-size="13pt" officeooo:paragraph-rsid="006fbe79" style:font-size-asian="13pt" style:font-size-complex="13pt"/>
    </style:style>
    <style:style style:name="P27" style:family="paragraph" style:parent-style-name="Table_20_Contents">
      <style:text-properties fo:font-size="13pt" officeooo:paragraph-rsid="0123c084" style:font-size-asian="13pt" style:font-size-complex="13pt"/>
    </style:style>
    <style:style style:name="P28" style:family="paragraph" style:parent-style-name="Table_20_Contents">
      <style:text-properties fo:font-size="13pt" officeooo:paragraph-rsid="007ec99a" style:font-size-asian="13pt" style:font-size-complex="13pt"/>
    </style:style>
    <style:style style:name="P29" style:family="paragraph" style:parent-style-name="Table_20_Contents">
      <style:text-properties fo:font-size="13pt" officeooo:paragraph-rsid="002f0ab5" style:font-size-asian="13pt" style:font-size-complex="13pt"/>
    </style:style>
    <style:style style:name="P30" style:family="paragraph" style:parent-style-name="Table_20_Contents">
      <style:text-properties fo:color="#127622" loext:opacity="100%" fo:font-size="13pt" officeooo:rsid="008573e6" officeooo:paragraph-rsid="008573e6" style:font-size-asian="13pt" style:font-size-complex="13pt"/>
    </style:style>
    <style:style style:name="P31" style:family="paragraph" style:parent-style-name="Table_20_Contents">
      <style:text-properties fo:font-size="13pt" officeooo:paragraph-rsid="009d0cca" style:font-size-asian="13pt" style:font-size-complex="13pt"/>
    </style:style>
    <style:style style:name="P32" style:family="paragraph" style:parent-style-name="Standard" style:list-style-name="L5">
      <style:text-properties fo:font-size="13pt" officeooo:paragraph-rsid="0086cd05" style:font-size-asian="13pt" style:font-size-complex="13pt"/>
    </style:style>
    <style:style style:name="P33" style:family="paragraph" style:parent-style-name="Standard" style:list-style-name="L5">
      <style:text-properties fo:font-size="13pt" officeooo:paragraph-rsid="008c1269" style:font-size-asian="13pt" style:font-size-complex="13pt"/>
    </style:style>
    <style:style style:name="P34" style:family="paragraph" style:parent-style-name="Standard" style:list-style-name="L5">
      <style:text-properties fo:font-size="13pt" officeooo:paragraph-rsid="0087a2aa" style:font-size-asian="13pt" style:font-size-complex="13pt"/>
    </style:style>
    <style:style style:name="P35" style:family="paragraph" style:parent-style-name="Standard" style:list-style-name="L5">
      <style:text-properties fo:font-size="13pt" officeooo:rsid="00900401" officeooo:paragraph-rsid="00900401" style:font-size-asian="13pt" style:font-size-complex="13pt"/>
    </style:style>
    <style:style style:name="P36" style:family="paragraph" style:parent-style-name="Standard" style:list-style-name="L5">
      <style:text-properties fo:font-size="13pt" officeooo:rsid="0090a09b" officeooo:paragraph-rsid="0090a09b" style:font-size-asian="13pt" style:font-size-complex="13pt"/>
    </style:style>
    <style:style style:name="P37" style:family="paragraph" style:parent-style-name="Standard" style:list-style-name="L5">
      <style:text-properties fo:font-size="13pt" officeooo:paragraph-rsid="00cee13b" style:font-size-asian="13pt" style:font-size-complex="13pt"/>
    </style:style>
    <style:style style:name="P38" style:family="paragraph" style:parent-style-name="Standard">
      <style:text-properties fo:font-size="13pt" officeooo:rsid="0086cd05" officeooo:paragraph-rsid="0086cd05" style:font-size-asian="13pt" style:font-size-complex="13pt"/>
    </style:style>
    <style:style style:name="P39" style:family="paragraph" style:parent-style-name="Table_20_Contents">
      <style:text-properties fo:color="#127622" loext:opacity="100%" fo:font-size="13pt" style:font-size-asian="13pt" style:font-size-complex="13pt"/>
    </style:style>
    <style:style style:name="P40" style:family="paragraph" style:parent-style-name="Table_20_Contents">
      <style:text-properties fo:font-size="13pt" style:font-size-asian="13pt" style:font-size-complex="13pt"/>
    </style:style>
    <style:style style:name="P41" style:family="paragraph" style:parent-style-name="Standard" style:list-style-name="L6">
      <style:text-properties fo:font-size="13pt" officeooo:rsid="008b144e" officeooo:paragraph-rsid="008b144e" style:font-size-asian="13pt" style:font-size-complex="13pt"/>
    </style:style>
    <style:style style:name="P42" style:family="paragraph" style:parent-style-name="Standard" style:list-style-name="L6">
      <style:text-properties fo:font-size="13pt" officeooo:paragraph-rsid="008b144e" style:font-size-asian="13pt" style:font-size-complex="13pt"/>
    </style:style>
    <style:style style:name="P43" style:family="paragraph" style:parent-style-name="Standard" style:list-style-name="L6">
      <style:text-properties fo:font-size="13pt" officeooo:rsid="0090ba58" officeooo:paragraph-rsid="0090ba58" style:font-size-asian="13pt" style:font-size-complex="13pt"/>
    </style:style>
    <style:style style:name="P44" style:family="paragraph" style:parent-style-name="Standard" style:list-style-name="L6">
      <style:text-properties officeooo:paragraph-rsid="0098f1d7"/>
    </style:style>
    <style:style style:name="P45" style:family="paragraph" style:parent-style-name="Standard">
      <style:text-properties fo:font-size="13pt" officeooo:rsid="0098f1d7" officeooo:paragraph-rsid="0098f1d7" style:font-size-asian="13pt" style:font-size-complex="13pt"/>
    </style:style>
    <style:style style:name="P46" style:family="paragraph" style:parent-style-name="Standard">
      <style:text-properties officeooo:paragraph-rsid="00a1d968"/>
    </style:style>
    <style:style style:name="P47" style:family="paragraph" style:parent-style-name="Standard">
      <style:text-properties fo:font-size="13pt" officeooo:rsid="009f94da" officeooo:paragraph-rsid="00a1d968" style:font-size-asian="13pt" style:font-size-complex="13pt"/>
    </style:style>
    <style:style style:name="P48" style:family="paragraph" style:parent-style-name="Standard">
      <style:paragraph-properties fo:text-align="center" style:justify-single-word="false"/>
      <style:text-properties fo:font-size="13pt" officeooo:rsid="00a5779f" officeooo:paragraph-rsid="00a5779f" style:font-size-asian="13pt" style:font-size-complex="13pt"/>
    </style:style>
    <style:style style:name="P49" style:family="paragraph" style:parent-style-name="Standard">
      <style:paragraph-properties fo:text-align="center" style:justify-single-word="false"/>
      <style:text-properties fo:font-size="13pt" officeooo:paragraph-rsid="00a5779f" style:font-size-asian="13pt" style:font-size-complex="13pt"/>
    </style:style>
    <style:style style:name="P50" style:family="paragraph" style:parent-style-name="Table_20_Contents">
      <style:paragraph-properties fo:text-align="center" style:justify-single-word="false"/>
      <style:text-properties fo:font-size="13pt" officeooo:rsid="00a39efe" officeooo:paragraph-rsid="00a39efe" style:font-size-asian="13pt" style:font-size-complex="13pt"/>
    </style:style>
    <style:style style:name="P51" style:family="paragraph" style:parent-style-name="Standard">
      <style:paragraph-properties fo:text-align="center" style:justify-single-word="false" fo:break-before="page"/>
      <style:text-properties fo:font-size="13pt" officeooo:paragraph-rsid="0101cf9a" style:font-size-asian="13pt" style:font-size-complex="13pt"/>
    </style:style>
    <style:style style:name="P52" style:family="paragraph" style:parent-style-name="Table_20_Contents">
      <style:text-properties fo:font-size="13pt" officeooo:paragraph-rsid="0101cf9a" style:font-size-asian="13pt" style:font-size-complex="13pt"/>
    </style:style>
    <style:style style:name="P53" style:family="paragraph" style:parent-style-name="Table_20_Contents" style:list-style-name="L7">
      <style:text-properties fo:font-size="13pt" officeooo:paragraph-rsid="0101cf9a" style:font-size-asian="13pt" style:font-size-complex="13pt"/>
    </style:style>
    <style:style style:name="P54" style:family="paragraph" style:parent-style-name="Table_20_Contents" style:list-style-name="L7">
      <style:text-properties fo:font-size="13pt" officeooo:rsid="00f42f1c" officeooo:paragraph-rsid="0101cf9a" style:font-size-asian="13pt" style:font-size-complex="13pt"/>
    </style:style>
    <style:style style:name="P55" style:family="paragraph" style:parent-style-name="Table_20_Contents" style:list-style-name="L7">
      <style:text-properties fo:font-size="13pt" officeooo:rsid="00f381ee" officeooo:paragraph-rsid="0101cf9a" style:font-size-asian="13pt" style:font-size-complex="13pt"/>
    </style:style>
    <style:style style:name="P56" style:family="paragraph" style:parent-style-name="Table_20_Contents" style:list-style-name="L7">
      <style:text-properties fo:font-size="13pt" officeooo:rsid="00f9eb32" officeooo:paragraph-rsid="0101cf9a" style:font-size-asian="13pt" style:font-size-complex="13pt"/>
    </style:style>
    <style:style style:name="P57" style:family="paragraph" style:parent-style-name="Table_20_Contents" style:list-style-name="L8">
      <style:text-properties fo:font-size="13pt" officeooo:paragraph-rsid="0101cf9a" style:font-size-asian="13pt" style:font-size-complex="13pt"/>
    </style:style>
    <style:style style:name="P58" style:family="paragraph" style:parent-style-name="Table_20_Contents" style:list-style-name="L8">
      <style:text-properties fo:font-size="13pt" officeooo:rsid="00ff3a3b" officeooo:paragraph-rsid="0101cf9a" style:font-size-asian="13pt" style:font-size-complex="13pt"/>
    </style:style>
    <style:style style:name="P59" style:family="paragraph" style:parent-style-name="Table_20_Contents" style:list-style-name="L8">
      <style:text-properties fo:font-size="13pt" officeooo:rsid="00f68ad9" officeooo:paragraph-rsid="0101cf9a" style:font-size-asian="13pt" style:font-size-complex="13pt"/>
    </style:style>
    <style:style style:name="P60" style:family="paragraph" style:parent-style-name="Table_20_Contents" style:list-style-name="L8">
      <style:text-properties fo:font-size="13pt" officeooo:rsid="00f8109b" officeooo:paragraph-rsid="0101cf9a" style:font-size-asian="13pt" style:font-size-complex="13pt"/>
    </style:style>
    <style:style style:name="P61" style:family="paragraph" style:parent-style-name="Table_20_Contents" style:list-style-name="L8">
      <style:text-properties fo:font-size="13pt" officeooo:rsid="010c35fd" officeooo:paragraph-rsid="010c35fd" style:font-size-asian="13pt" style:font-size-complex="13pt"/>
    </style:style>
    <style:style style:name="P62" style:family="paragraph" style:parent-style-name="Standard">
      <style:text-properties fo:font-size="13pt" officeooo:paragraph-rsid="0101cf9a" style:font-size-asian="13pt" style:font-size-complex="13pt"/>
    </style:style>
    <style:style style:name="P63" style:family="paragraph" style:parent-style-name="Standard">
      <style:paragraph-properties fo:text-align="center" style:justify-single-word="false"/>
      <style:text-properties officeooo:paragraph-rsid="00c32b72"/>
    </style:style>
    <style:style style:name="P64" style:family="paragraph" style:parent-style-name="Table_20_Contents">
      <style:paragraph-properties fo:text-align="center" style:justify-single-word="false"/>
      <style:text-properties fo:color="#127622" loext:opacity="100%" fo:font-size="13pt" officeooo:rsid="00237682" officeooo:paragraph-rsid="00c32b72" style:font-size-asian="13pt" style:font-size-complex="13pt"/>
    </style:style>
    <style:style style:name="P65" style:family="paragraph" style:parent-style-name="Table_20_Contents">
      <style:paragraph-properties fo:text-align="center" style:justify-single-word="false"/>
      <style:text-properties fo:font-size="13pt" officeooo:rsid="00c3985d" officeooo:paragraph-rsid="00c3985d" style:font-size-asian="13pt" style:font-size-complex="13pt"/>
    </style:style>
    <style:style style:name="P66" style:family="paragraph" style:parent-style-name="Table_20_Contents">
      <style:paragraph-properties fo:text-align="left" style:justify-single-word="false"/>
      <style:text-properties officeooo:paragraph-rsid="00c3985d"/>
    </style:style>
    <style:style style:name="P67" style:family="paragraph" style:parent-style-name="Table_20_Contents">
      <style:paragraph-properties fo:text-align="center" style:justify-single-word="false"/>
      <style:text-properties fo:color="#127622" loext:opacity="100%" fo:font-size="13pt" officeooo:rsid="00237682" officeooo:paragraph-rsid="00c5b661" style:font-size-asian="13pt" style:font-size-complex="13pt"/>
    </style:style>
    <style:style style:name="P68" style:family="paragraph" style:parent-style-name="Table_20_Contents">
      <style:paragraph-properties fo:text-align="center" style:justify-single-word="false"/>
      <style:text-properties fo:font-size="13pt" officeooo:rsid="00c5b661" officeooo:paragraph-rsid="00c5b661" style:font-size-asian="13pt" style:font-size-complex="13pt"/>
    </style:style>
    <style:style style:name="P69" style:family="paragraph" style:parent-style-name="Table_20_Contents">
      <style:paragraph-properties fo:text-align="left" style:justify-single-word="false"/>
      <style:text-properties officeooo:paragraph-rsid="00c5b661"/>
    </style:style>
    <style:style style:name="P70" style:family="paragraph" style:parent-style-name="Table_20_Contents">
      <style:paragraph-properties fo:text-align="center" style:justify-single-word="false"/>
      <style:text-properties fo:color="#127622" loext:opacity="100%" fo:font-size="13pt" officeooo:rsid="00237682" style:font-size-asian="13pt" style:font-size-complex="13pt"/>
    </style:style>
    <style:style style:name="P71" style:family="paragraph" style:parent-style-name="Table_20_Contents">
      <style:paragraph-properties fo:text-align="left" style:justify-single-word="false"/>
      <style:text-properties officeooo:paragraph-rsid="00c76e64"/>
    </style:style>
    <style:style style:name="P72" style:family="paragraph" style:parent-style-name="Standard">
      <style:paragraph-properties fo:text-align="center" style:justify-single-word="false"/>
      <style:text-properties fo:font-size="13pt" officeooo:rsid="00c32b72" officeooo:paragraph-rsid="00c32b72" style:font-size-asian="13pt" style:font-size-complex="13pt"/>
    </style:style>
    <style:style style:name="P73" style:family="paragraph" style:parent-style-name="Table_20_Contents">
      <style:paragraph-properties fo:text-align="center" style:justify-single-word="false"/>
      <style:text-properties fo:font-size="13pt" officeooo:rsid="001f309a" officeooo:paragraph-rsid="001f309a" style:font-size-asian="13pt" style:font-size-complex="13pt"/>
    </style:style>
    <style:style style:name="P74" style:family="paragraph" style:parent-style-name="Table_20_Contents">
      <style:paragraph-properties fo:text-align="center" style:justify-single-word="false"/>
      <style:text-properties fo:font-size="13pt" officeooo:rsid="008f751a" officeooo:paragraph-rsid="008f751a" style:font-size-asian="13pt" style:font-size-complex="13pt"/>
    </style:style>
    <style:style style:name="T1" style:family="text">
      <style:text-properties style:text-position="super 58%" officeooo:rsid="001f309a"/>
    </style:style>
    <style:style style:name="T2" style:family="text">
      <style:text-properties officeooo:rsid="00a6dc29"/>
    </style:style>
    <style:style style:name="T3" style:family="text">
      <style:text-properties officeooo:rsid="003a4b46"/>
    </style:style>
    <style:style style:name="T4" style:family="text">
      <style:text-properties officeooo:rsid="00d289af"/>
    </style:style>
    <style:style style:name="T5" style:family="text">
      <style:text-properties officeooo:rsid="00dc7539"/>
    </style:style>
    <style:style style:name="T6" style:family="text">
      <style:text-properties officeooo:rsid="00dec1da"/>
    </style:style>
    <style:style style:name="T7" style:family="text">
      <style:text-properties officeooo:rsid="00d6d0ec"/>
    </style:style>
    <style:style style:name="T8" style:family="text">
      <style:text-properties officeooo:rsid="00d7e7df"/>
    </style:style>
    <style:style style:name="T9" style:family="text">
      <style:text-properties officeooo:rsid="011624ff"/>
    </style:style>
    <style:style style:name="T10" style:family="text">
      <style:text-properties officeooo:rsid="00e0b186"/>
    </style:style>
    <style:style style:name="T11" style:family="text">
      <style:text-properties officeooo:rsid="00ac9a64"/>
    </style:style>
    <style:style style:name="T12" style:family="text">
      <style:text-properties officeooo:rsid="00d99a40"/>
    </style:style>
    <style:style style:name="T13" style:family="text">
      <style:text-properties officeooo:rsid="00ae16f4"/>
    </style:style>
    <style:style style:name="T14" style:family="text">
      <style:text-properties officeooo:rsid="00e133ea"/>
    </style:style>
    <style:style style:name="T15" style:family="text">
      <style:text-properties officeooo:rsid="00af9837"/>
    </style:style>
    <style:style style:name="T16" style:family="text">
      <style:text-properties officeooo:rsid="00dab845"/>
    </style:style>
    <style:style style:name="T17" style:family="text">
      <style:text-properties officeooo:rsid="00e3334a"/>
    </style:style>
    <style:style style:name="T18" style:family="text">
      <style:text-properties officeooo:rsid="00e43453"/>
    </style:style>
    <style:style style:name="T19" style:family="text">
      <style:text-properties officeooo:rsid="0049c134"/>
    </style:style>
    <style:style style:name="T20" style:family="text">
      <style:text-properties officeooo:rsid="00237682"/>
    </style:style>
    <style:style style:name="T21" style:family="text">
      <style:text-properties officeooo:rsid="003c8154"/>
    </style:style>
    <style:style style:name="T22" style:family="text">
      <style:text-properties officeooo:rsid="00606361"/>
    </style:style>
    <style:style style:name="T23" style:family="text">
      <style:text-properties officeooo:rsid="00b2d151"/>
    </style:style>
    <style:style style:name="T24" style:family="text">
      <style:text-properties officeooo:rsid="002545d5"/>
    </style:style>
    <style:style style:name="T25" style:family="text">
      <style:text-properties officeooo:rsid="00e622b1"/>
    </style:style>
    <style:style style:name="T26" style:family="text">
      <style:text-properties officeooo:rsid="00e806ba"/>
    </style:style>
    <style:style style:name="T27" style:family="text">
      <style:text-properties fo:color="#127622" loext:opacity="100%" officeooo:rsid="00e806ba"/>
    </style:style>
    <style:style style:name="T28" style:family="text">
      <style:text-properties officeooo:rsid="00e85fa3"/>
    </style:style>
    <style:style style:name="T29" style:family="text">
      <style:text-properties officeooo:rsid="003baecc"/>
    </style:style>
    <style:style style:name="T30" style:family="text">
      <style:text-properties fo:font-style="italic" officeooo:rsid="003baecc" style:font-style-asian="italic" style:font-style-complex="italic"/>
    </style:style>
    <style:style style:name="T31" style:family="text">
      <style:text-properties officeooo:rsid="011b3e8e"/>
    </style:style>
    <style:style style:name="T32" style:family="text">
      <style:text-properties officeooo:rsid="011be9dc"/>
    </style:style>
    <style:style style:name="T33" style:family="text">
      <style:text-properties officeooo:rsid="0033b56f"/>
    </style:style>
    <style:style style:name="T34" style:family="text">
      <style:text-properties officeooo:rsid="00b45e75"/>
    </style:style>
    <style:style style:name="T35" style:family="text">
      <style:text-properties officeooo:rsid="003ecfdf"/>
    </style:style>
    <style:style style:name="T36" style:family="text">
      <style:text-properties officeooo:rsid="0065ffb7"/>
    </style:style>
    <style:style style:name="T37" style:family="text">
      <style:text-properties officeooo:rsid="0061cf06"/>
    </style:style>
    <style:style style:name="T38" style:family="text">
      <style:text-properties officeooo:rsid="00400e90"/>
    </style:style>
    <style:style style:name="T39" style:family="text">
      <style:text-properties officeooo:rsid="00669ba5"/>
    </style:style>
    <style:style style:name="T40" style:family="text">
      <style:text-properties officeooo:rsid="0067ecd5"/>
    </style:style>
    <style:style style:name="T41" style:family="text">
      <style:text-properties officeooo:rsid="00456ec9"/>
    </style:style>
    <style:style style:name="T42" style:family="text">
      <style:text-properties officeooo:rsid="0062bd13"/>
    </style:style>
    <style:style style:name="T43" style:family="text">
      <style:text-properties fo:color="#127622" loext:opacity="100%" officeooo:rsid="00237682"/>
    </style:style>
    <style:style style:name="T44" style:family="text">
      <style:text-properties officeooo:rsid="00694dbe"/>
    </style:style>
    <style:style style:name="T45" style:family="text">
      <style:text-properties officeooo:rsid="003ff075"/>
    </style:style>
    <style:style style:name="T46" style:family="text">
      <style:text-properties style:text-underline-style="solid" style:text-underline-width="auto" style:text-underline-color="font-color" officeooo:rsid="003ff075"/>
    </style:style>
    <style:style style:name="T47" style:family="text">
      <style:text-properties officeooo:rsid="0042d201"/>
    </style:style>
    <style:style style:name="T48" style:family="text">
      <style:text-properties officeooo:rsid="0040c6ce"/>
    </style:style>
    <style:style style:name="T49" style:family="text">
      <style:text-properties officeooo:rsid="00415fc7"/>
    </style:style>
    <style:style style:name="T50" style:family="text">
      <style:text-properties officeooo:rsid="0047c814"/>
    </style:style>
    <style:style style:name="T51" style:family="text">
      <style:text-properties style:text-underline-style="solid" style:text-underline-width="auto" style:text-underline-color="font-color" officeooo:rsid="0047c814"/>
    </style:style>
    <style:style style:name="T52" style:family="text">
      <style:text-properties officeooo:rsid="0044466e"/>
    </style:style>
    <style:style style:name="T53" style:family="text">
      <style:text-properties officeooo:rsid="0043b3cf"/>
    </style:style>
    <style:style style:name="T54" style:family="text">
      <style:text-properties officeooo:rsid="006b1e07"/>
    </style:style>
    <style:style style:name="T55" style:family="text">
      <style:text-properties officeooo:rsid="006dc5ad"/>
    </style:style>
    <style:style style:name="T56" style:family="text">
      <style:text-properties officeooo:rsid="004bf0f2"/>
    </style:style>
    <style:style style:name="T57" style:family="text">
      <style:text-properties officeooo:rsid="006d6388"/>
    </style:style>
    <style:style style:name="T58" style:family="text">
      <style:text-properties officeooo:rsid="006f52a7"/>
    </style:style>
    <style:style style:name="T59" style:family="text">
      <style:text-properties officeooo:rsid="00eaace0"/>
    </style:style>
    <style:style style:name="T60" style:family="text">
      <style:text-properties officeooo:rsid="004f2dc4"/>
    </style:style>
    <style:style style:name="T61" style:family="text">
      <style:text-properties officeooo:rsid="006fbe79"/>
    </style:style>
    <style:style style:name="T62" style:family="text">
      <style:text-properties officeooo:rsid="00ba2758"/>
    </style:style>
    <style:style style:name="T63" style:family="text">
      <style:text-properties officeooo:rsid="00baa334"/>
    </style:style>
    <style:style style:name="T64" style:family="text">
      <style:text-properties officeooo:rsid="0070d75c"/>
    </style:style>
    <style:style style:name="T65" style:family="text">
      <style:text-properties officeooo:rsid="0072174a"/>
    </style:style>
    <style:style style:name="T66" style:family="text">
      <style:text-properties officeooo:rsid="0077bfde"/>
    </style:style>
    <style:style style:name="T67" style:family="text">
      <style:text-properties officeooo:rsid="0079d6da"/>
    </style:style>
    <style:style style:name="T68" style:family="text">
      <style:text-properties officeooo:rsid="00ec8f0d"/>
    </style:style>
    <style:style style:name="T69" style:family="text">
      <style:text-properties style:text-underline-style="none" officeooo:rsid="007cd4fa"/>
    </style:style>
    <style:style style:name="T70" style:family="text">
      <style:text-properties style:text-underline-style="none" officeooo:rsid="007ec99a"/>
    </style:style>
    <style:style style:name="T71" style:family="text">
      <style:text-properties style:text-underline-style="none" officeooo:rsid="007f5478"/>
    </style:style>
    <style:style style:name="T72" style:family="text">
      <style:text-properties style:text-underline-style="none" officeooo:rsid="007e2f63"/>
    </style:style>
    <style:style style:name="T73" style:family="text">
      <style:text-properties style:text-underline-style="none" officeooo:rsid="00bc4e6a"/>
    </style:style>
    <style:style style:name="T74" style:family="text">
      <style:text-properties style:text-underline-style="none" officeooo:rsid="00be1532"/>
    </style:style>
    <style:style style:name="T75" style:family="text">
      <style:text-properties style:text-underline-style="none" officeooo:rsid="007fa444"/>
    </style:style>
    <style:style style:name="T76" style:family="text">
      <style:text-properties style:text-underline-style="none" officeooo:rsid="00804e13"/>
    </style:style>
    <style:style style:name="T77" style:family="text">
      <style:text-properties officeooo:rsid="00264579"/>
    </style:style>
    <style:style style:name="T78" style:family="text">
      <style:text-properties officeooo:rsid="005162e8"/>
    </style:style>
    <style:style style:name="T79" style:family="text">
      <style:text-properties officeooo:rsid="00763994"/>
    </style:style>
    <style:style style:name="T80" style:family="text">
      <style:text-properties style:text-underline-style="solid" style:text-underline-width="auto" style:text-underline-color="font-color" officeooo:rsid="0052753e"/>
    </style:style>
    <style:style style:name="T81" style:family="text">
      <style:text-properties style:text-underline-style="none" officeooo:rsid="005162e8"/>
    </style:style>
    <style:style style:name="T82" style:family="text">
      <style:text-properties style:text-underline-style="none" officeooo:rsid="00540515"/>
    </style:style>
    <style:style style:name="T83" style:family="text">
      <style:text-properties style:text-underline-style="none" officeooo:rsid="005416d2"/>
    </style:style>
    <style:style style:name="T84" style:family="text">
      <style:text-properties officeooo:rsid="002f0ab5"/>
    </style:style>
    <style:style style:name="T85" style:family="text">
      <style:text-properties officeooo:rsid="003685d7"/>
    </style:style>
    <style:style style:name="T86" style:family="text">
      <style:text-properties officeooo:rsid="0081443e"/>
    </style:style>
    <style:style style:name="T87" style:family="text">
      <style:text-properties officeooo:rsid="00315c1d"/>
    </style:style>
    <style:style style:name="T88" style:family="text">
      <style:text-properties officeooo:rsid="00586eb4"/>
    </style:style>
    <style:style style:name="T89" style:family="text">
      <style:text-properties officeooo:rsid="00592c92"/>
    </style:style>
    <style:style style:name="T90" style:family="text">
      <style:text-properties style:text-underline-style="solid" style:text-underline-width="auto" style:text-underline-color="font-color" officeooo:rsid="00586eb4"/>
    </style:style>
    <style:style style:name="T91" style:family="text">
      <style:text-properties officeooo:rsid="0059c52f"/>
    </style:style>
    <style:style style:name="T92" style:family="text">
      <style:text-properties officeooo:rsid="005abb3a"/>
    </style:style>
    <style:style style:name="T93" style:family="text">
      <style:text-properties style:text-position="super 58%" officeooo:rsid="008f05bf"/>
    </style:style>
    <style:style style:name="T94" style:family="text">
      <style:text-properties style:text-position="super 58%"/>
    </style:style>
    <style:style style:name="T95" style:family="text">
      <style:text-properties officeooo:rsid="0086cd05"/>
    </style:style>
    <style:style style:name="T96" style:family="text">
      <style:text-properties officeooo:rsid="008c1269"/>
    </style:style>
    <style:style style:name="T97" style:family="text">
      <style:text-properties officeooo:rsid="008d0e2a"/>
    </style:style>
    <style:style style:name="T98" style:family="text">
      <style:text-properties officeooo:rsid="008effec"/>
    </style:style>
    <style:style style:name="T99" style:family="text">
      <style:text-properties officeooo:rsid="0104a60b"/>
    </style:style>
    <style:style style:name="T100" style:family="text">
      <style:text-properties officeooo:rsid="008f05bf"/>
    </style:style>
    <style:style style:name="T101" style:family="text">
      <style:text-properties officeooo:rsid="0087a2aa"/>
    </style:style>
    <style:style style:name="T102" style:family="text">
      <style:text-properties officeooo:rsid="011e6699"/>
    </style:style>
    <style:style style:name="T103" style:family="text">
      <style:text-properties officeooo:rsid="00893bd6"/>
    </style:style>
    <style:style style:name="T104" style:family="text">
      <style:text-properties officeooo:rsid="00944038"/>
    </style:style>
    <style:style style:name="T105" style:family="text">
      <style:text-properties officeooo:rsid="008ca888"/>
    </style:style>
    <style:style style:name="T106" style:family="text">
      <style:text-properties officeooo:rsid="00969601"/>
    </style:style>
    <style:style style:name="T107" style:family="text">
      <style:text-properties officeooo:rsid="01056079"/>
    </style:style>
    <style:style style:name="T108" style:family="text">
      <style:text-properties officeooo:rsid="0090a09b"/>
    </style:style>
    <style:style style:name="T109" style:family="text">
      <style:text-properties officeooo:rsid="0093df2b"/>
    </style:style>
    <style:style style:name="T110" style:family="text">
      <style:text-properties officeooo:rsid="011f1b4a"/>
    </style:style>
    <style:style style:name="T111" style:family="text">
      <style:text-properties officeooo:rsid="00cee13b"/>
    </style:style>
    <style:style style:name="T112" style:family="text">
      <style:text-properties officeooo:rsid="01062a35"/>
    </style:style>
    <style:style style:name="T113" style:family="text">
      <style:text-properties officeooo:rsid="010750c7"/>
    </style:style>
    <style:style style:name="T114" style:family="text">
      <style:text-properties officeooo:rsid="0120e7d7"/>
    </style:style>
    <style:style style:name="T115" style:family="text">
      <style:text-properties officeooo:rsid="01214fae"/>
    </style:style>
    <style:style style:name="T116" style:family="text">
      <style:text-properties officeooo:rsid="008b144e"/>
    </style:style>
    <style:style style:name="T117" style:family="text">
      <style:text-properties officeooo:rsid="00979e8d"/>
    </style:style>
    <style:style style:name="T118" style:family="text">
      <style:text-properties officeooo:rsid="00924258"/>
    </style:style>
    <style:style style:name="T119" style:family="text">
      <style:text-properties officeooo:rsid="0108d9f9"/>
    </style:style>
    <style:style style:name="T120" style:family="text">
      <style:text-properties fo:color="#127622" loext:opacity="100%" officeooo:rsid="0108d9f9"/>
    </style:style>
    <style:style style:name="T121" style:family="text">
      <style:text-properties fo:font-size="13pt" officeooo:rsid="0098f1d7" style:font-size-asian="13pt" style:font-size-complex="13pt"/>
    </style:style>
    <style:style style:name="T122" style:family="text">
      <style:text-properties fo:font-size="13pt" officeooo:rsid="010a5870" style:font-size-asian="13pt" style:font-size-complex="13pt"/>
    </style:style>
    <style:style style:name="T123" style:family="text">
      <style:text-properties fo:font-size="13pt" officeooo:rsid="01222309" style:font-size-asian="13pt" style:font-size-complex="13pt"/>
    </style:style>
    <style:style style:name="T124" style:family="text">
      <style:text-properties fo:color="#127622" loext:opacity="100%" fo:font-size="13pt" officeooo:rsid="010a5870" style:font-size-asian="13pt" style:font-size-complex="13pt"/>
    </style:style>
    <style:style style:name="T125" style:family="text">
      <style:text-properties fo:font-size="13pt" officeooo:rsid="010ad281" style:font-size-asian="13pt" style:font-size-complex="13pt"/>
    </style:style>
    <style:style style:name="T126" style:family="text">
      <style:text-properties fo:font-size="13pt" officeooo:rsid="0122d52d" style:font-size-asian="13pt" style:font-size-complex="13pt"/>
    </style:style>
    <style:style style:name="T127" style:family="text">
      <style:text-properties fo:color="#127622" loext:opacity="100%" fo:font-size="13pt" officeooo:rsid="00237682" style:font-size-asian="13pt" style:font-size-complex="13pt"/>
    </style:style>
    <style:style style:name="T128" style:family="text">
      <style:text-properties fo:font-size="13pt" officeooo:rsid="009f39e0" style:font-size-asian="13pt" style:font-size-complex="13pt"/>
    </style:style>
    <style:style style:name="T129" style:family="text">
      <style:text-properties fo:font-size="13pt" officeooo:rsid="009d81c4" style:font-size-asian="13pt" style:font-size-complex="13pt"/>
    </style:style>
    <style:style style:name="T130" style:family="text">
      <style:text-properties fo:font-size="13pt" officeooo:rsid="009f94da" style:font-size-asian="13pt" style:font-size-complex="13pt"/>
    </style:style>
    <style:style style:name="T131" style:family="text">
      <style:text-properties fo:font-size="13pt" officeooo:rsid="00a1d968" style:font-size-asian="13pt" style:font-size-complex="13pt"/>
    </style:style>
    <style:style style:name="T132" style:family="text">
      <style:text-properties fo:font-size="13pt" officeooo:rsid="00a0b0d4" style:font-size-asian="13pt" style:font-size-complex="13pt"/>
    </style:style>
    <style:style style:name="T133" style:family="text">
      <style:text-properties officeooo:rsid="00fdbf8a"/>
    </style:style>
    <style:style style:name="T134" style:family="text">
      <style:text-properties officeooo:rsid="008167f0"/>
    </style:style>
    <style:style style:name="T135" style:family="text">
      <style:text-properties officeooo:rsid="00f58d24"/>
    </style:style>
    <style:style style:name="T136" style:family="text">
      <style:text-properties officeooo:rsid="00f87e44"/>
    </style:style>
    <style:style style:name="T137" style:family="text">
      <style:text-properties officeooo:rsid="00f2f227"/>
    </style:style>
    <style:style style:name="T138" style:family="text">
      <style:text-properties officeooo:rsid="011194e7"/>
    </style:style>
    <style:style style:name="T139" style:family="text">
      <style:text-properties officeooo:rsid="00fb855f"/>
    </style:style>
    <style:style style:name="T140" style:family="text">
      <style:text-properties officeooo:rsid="00fc9612"/>
    </style:style>
    <style:style style:name="T141" style:family="text">
      <style:text-properties officeooo:rsid="00846205"/>
    </style:style>
    <style:style style:name="T142" style:family="text">
      <style:text-properties officeooo:rsid="01000c29"/>
    </style:style>
    <style:style style:name="T143" style:family="text">
      <style:text-properties officeooo:rsid="010d0d2e"/>
    </style:style>
    <style:style style:name="T144" style:family="text">
      <style:text-properties fo:font-size="13pt" officeooo:rsid="00c32b72" style:font-size-asian="13pt" style:font-size-complex="13pt"/>
    </style:style>
    <style:style style:name="T145" style:family="text">
      <style:text-properties officeooo:rsid="00c5b661"/>
    </style:style>
    <style:style style:name="T146" style:family="text">
      <style:text-properties fo:font-size="13pt" officeooo:rsid="00c3985d" style:font-size-asian="13pt" style:font-size-complex="13pt"/>
    </style:style>
    <style:style style:name="T147" style:family="text">
      <style:text-properties fo:font-size="13pt" officeooo:rsid="00c4a1ac" style:font-size-asian="13pt" style:font-size-complex="13pt"/>
    </style:style>
    <style:style style:name="T148" style:family="text">
      <style:text-properties fo:font-size="13pt" officeooo:rsid="00c5b661" style:font-size-asian="13pt" style:font-size-complex="13pt"/>
    </style:style>
    <style:style style:name="T149" style:family="text">
      <style:text-properties fo:font-size="13pt" officeooo:rsid="00c76e64" style:font-size-asian="13pt" style:font-size-complex="13pt"/>
    </style:style>
    <style:style style:name="T150" style:family="text">
      <style:text-properties fo:font-size="13pt" officeooo:rsid="00c961bb" style:font-size-asian="13pt" style:font-size-complex="13pt"/>
    </style:style>
    <style:style style:name="T151" style:family="text">
      <style:text-properties fo:font-size="13pt" officeooo:rsid="00ca53a8" style:font-size-asian="13pt" style:font-size-complex="13pt"/>
    </style:style>
    <style:style style:name="T152" style:family="text">
      <style:text-properties fo:font-size="13pt" officeooo:rsid="00cb2566" style:font-size-asian="13pt" style:font-size-complex="13pt"/>
    </style:style>
    <style:style style:name="T153" style:family="text">
      <style:text-properties fo:font-size="13pt" officeooo:rsid="00cd08af" style:font-size-asian="13pt" style:font-size-complex="13pt"/>
    </style:style>
    <style:style style:name="T154" style:family="text">
      <style:text-properties officeooo:rsid="012357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brews 13:9</text:p>
      <text:p text:style-name="P2">Be not carried about with divers and strange doctrines. For it is a good thing that the heart be established with grace<text:span text:style-name="T1">G5485</text:span>; not with meats, which have not profited them that have been occupied therein.</text:p>
      <text:p text:style-name="P2"/>
      <text:list text:style-name="L1">
        <text:list-item>
          <text:p text:style-name="P3">Hebrews chapter 13 is the last chapter of the book of Hebrews. It concludes itself with many concise summaries of <text:span text:style-name="T2">commands and </text:span>exhortations.</text:p>
        </text:list-item>
      </text:list>
      <text:p text:style-name="P4"/>
      <text:list text:continue-numbering="true" text:style-name="L1">
        <text:list-item>
          <text:p text:style-name="P5">Its very profitable to take the time to think each <text:span text:style-name="T3">sentence</text:span> through very carefully, comparing scripture to scripture <text:span text:style-name="T4">as needed </text:span><text:span text:style-name="T5">and/or consulting the resources we know to be profitable </text:span>to understand what each word means.</text:p>
        </text:list-item>
      </text:list>
      <text:p text:style-name="P2"/>
      <table:table table:name="Table3" table:style-name="Table3">
        <table:table-column table:style-name="Table3.A"/>
        <table:table-row>
          <table:table-cell table:style-name="Table3.A1" office:value-type="string">
            <text:p text:style-name="P6">Hebrews 13:9a</text:p>
            <text:p text:style-name="P7">Be not carried about with divers and strange doctrines.</text:p>
          </table:table-cell>
        </table:table-row>
        <table:table-row>
          <table:table-cell table:style-name="Table3.A2" office:value-type="string">
            <text:list text:style-name="L2">
              <text:list-item>
                <text:p text:style-name="P8">Be not</text:p>
                <text:list>
                  <text:list-item>
                    <text:p text:style-name="P8">This is a thing we are <text:span text:style-name="T6">commanded </text:span>to avoid.</text:p>
                  </text:list-item>
                </text:list>
              </text:list-item>
              <text:list-item>
                <text:p text:style-name="P8">carried</text:p>
                <text:list>
                  <text:list-item>
                    <text:p text:style-name="P8">To be carried is to have someone <text:span text:style-name="T7">bear you but that usage doesn’t make sense here because teachings (doctrines) don’t carry things. Carry can also mean “to effect, to urge, impel, lead or draw, to imply or import, to contain or comprise, to support or sustain, to remove, lead or drive”</text:span></text:p>
                  </text:list-item>
                  <text:list-item>
                    <text:p text:style-name="P9">Would you let someone <text:span text:style-name="T8">or something </text:span>carry you that you don’t trust?<text:span text:style-name="T9"> </text:span>Therefore, trust is implied.</text:p>
                  </text:list-item>
                </text:list>
              </text:list-item>
              <text:list-item>
                <text:p text:style-name="P10">about</text:p>
                <text:list>
                  <text:list-item>
                    <text:p text:style-name="P10">Somewhere other than where you are.</text:p>
                  </text:list-item>
                  <text:list-item>
                    <text:p text:style-name="P10">From one place to another.</text:p>
                  </text:list-item>
                </text:list>
              </text:list-item>
              <text:list-item>
                <text:p text:style-name="P11">with divers </text:p>
                <text:list>
                  <text:list-item>
                    <text:p text:style-name="P11"><text:span text:style-name="T10">D</text:span>iversity <text:span text:style-name="T11">is</text:span> many different things, <text:span text:style-name="T12">a</text:span><text:span text:style-name="T13"> wide variety.</text:span></text:p>
                  </text:list-item>
                </text:list>
              </text:list-item>
              <text:list-item>
                <text:p text:style-name="P11">and strange</text:p>
                <text:list>
                  <text:list-item>
                    <text:p text:style-name="P11">The opposite of strange is familiar. <text:span text:style-name="T10">Strange can also </text:span><text:span text:style-name="T14">mean</text:span><text:span text:style-name="T10"> odd, unusual, or irregular.</text:span></text:p>
                  </text:list-item>
                  <text:list-item>
                    <text:p text:style-name="P12"><text:span text:style-name="T15">If scripture is what we’re to be familiar with, then</text:span> lies are <text:span text:style-name="T16">an example of something that is </text:span>strange.</text:p>
                  </text:list-item>
                </text:list>
              </text:list-item>
              <text:list-item>
                <text:p text:style-name="P11">doctrines</text:p>
                <text:list>
                  <text:list-item>
                    <text:p text:style-name="P11">Doctrines are teachings, <text:span text:style-name="T17">knowledge, and the truths of </text:span><text:span text:style-name="T18">the </text:span><text:span text:style-name="T17">gospel in general.</text:span></text:p>
                  </text:list-item>
                </text:list>
              </text:list-item>
            </text:list>
            <text:p text:style-name="P13"/>
            <text:p text:style-name="P14">Putting it all together <text:span text:style-name="T19">we can begin to understand</text:span>:</text:p>
            <text:p text:style-name="P14"/>
            <text:list text:style-name="L3">
              <text:list-item>
                <text:p text:style-name="P15"><text:span text:style-name="T20">Many different strange teachings</text:span><text:span text:style-name="T21"> </text:span><text:span text:style-name="T20">exist in the world.</text:span></text:p>
                <text:list>
                  <text:list-item>
                    <text:p text:style-name="P16"><text:span text:style-name="T20">I</text:span>f they didn’t exist <text:span text:style-name="T22">it doesn’t make much sense that </text:span>we would be <text:span text:style-name="T23">commanded</text:span><text:span text:style-name="T22"> </text:span>to avoid them.</text:p>
                  </text:list-item>
                </text:list>
              </text:list-item>
              <text:list-item>
                <text:p text:style-name="P17"><text:span text:style-name="T24">D</text:span>o not put your trust in those false teachings <text:span text:style-name="T25">(lies)</text:span>, <text:span text:style-name="T25">instead trust in what God has taught you (the truth)</text:span><text:span text:style-name="T26">(</text:span><text:span text:style-name="T27">Heb. 6:18b</text:span><text:span text:style-name="T26">).</text:span></text:p>
                <text:list>
                  <text:list-item>
                    <text:p text:style-name="P15"><text:span text:style-name="T28">Willingly or unwillingly l</text:span><text:span text:style-name="T29">etting yourself be </text:span><text:span text:style-name="T28">d</text:span><text:span text:style-name="T29">eceived means that on some level you </text:span><text:span text:style-name="T30">believe</text:span><text:span text:style-name="T29"> what was told </text:span><text:span text:style-name="T31">you and a consequence of that is </text:span><text:span text:style-name="T32">that </text:span><text:span text:style-name="T31">it affects/</text:span><text:span text:style-name="T32">changes</text:span><text:span text:style-name="T21"> your thoughts and/or behavior.</text:span></text:p>
                  </text:list-item>
                </text:list>
              </text:list-item>
            </text:list>
            <text:p text:style-name="P18"/>
            <text:p text:style-name="P19"><text:soft-page-break/><text:span text:style-name="T33">I</text:span>f we are <text:span text:style-name="T34">commanded</text:span> to avoid false teachings <text:span text:style-name="T35">(like a boat on the sea with no </text:span><text:span text:style-name="T36">rudder or </text:span><text:span text:style-name="T35">sail is tossed about) what do you think the advice is? The opposite of avoiding false teachings </text:span><text:span text:style-name="T37">(stay away from them) </text:span><text:span text:style-name="T35">is to keep ourselves close to the truth. </text:span><text:span text:style-name="T38">Our “boat” needs a “</text:span><text:span text:style-name="T39">rudder” to steer it and a </text:span><text:span text:style-name="T38">“sail” to </text:span><text:span text:style-name="T39">push it along </text:span><text:span text:style-name="T38">safely and </text:span><text:span text:style-name="T40">they are</text:span><text:span text:style-name="T41"> </text:span><text:span text:style-name="T38">God’s word and </text:span><text:span text:style-name="T42">the Holy Ghost</text:span><text:span text:style-name="T38">.</text:span></text:p>
            <text:p text:style-name="P19"/>
            <text:p text:style-name="P20"><text:span text:style-name="T35">In </text:span><text:span text:style-name="T43">John 17:17</text:span><text:span text:style-name="T35"> Jesus tells us that God’s word is truth </text:span><text:span text:style-name="T44">so</text:span><text:span text:style-name="T35"> studying and memorizing God’s word </text:span><text:span text:style-name="T44">can help steer our boat in any situation</text:span><text:span text:style-name="T35">. </text:span><text:span text:style-name="T45">In John </text:span><text:span text:style-name="T43">16:13</text:span><text:span text:style-name="T45"> Jesus tells us that the Spirit of truth (the Holy Ghost which indwells every reborn Christian) </text:span><text:span text:style-name="T46">will</text:span><text:span text:style-name="T45"> guide us into all truth. </text:span><text:span text:style-name="T47">Since it’s possible to resist the Holy Ghost</text:span><text:span text:style-name="T48"> (</text:span><text:span text:style-name="T43">Luke 13:34</text:span><text:span text:style-name="T48">, </text:span><text:span text:style-name="T43">I Thess. 5:19</text:span><text:span text:style-name="T48">, </text:span><text:span text:style-name="T43">Acts 7:51</text:span><text:span text:style-name="T49">, </text:span><text:span text:style-name="T43">Eph. 4:30</text:span><text:span text:style-name="T48">) </text:span><text:span text:style-name="T50">and Jesus said that “</text:span><text:span text:style-name="T51">he will guide you</text:span><text:span text:style-name="T50"> into all truth” it becomes</text:span><text:span text:style-name="T47"> </text:span><text:span text:style-name="T52">crucial</text:span><text:span text:style-name="T47"> that we </text:span><text:span text:style-name="T53">are willing to receive </text:span><text:span text:style-name="T47">that guidance </text:span><text:span text:style-name="T54">and let Him push our boat along. </text:span><text:span text:style-name="T55">Several</text:span><text:span text:style-name="T56"> good Christian habits arise from this </text:span><text:span text:style-name="T57">that result in our “boat” being both stable and moving along safely avoiding obstacles:</text:span></text:p>
            <text:p text:style-name="P20"/>
            <text:list text:style-name="L4">
              <text:list-item>
                <text:list>
                  <text:list-item>
                    <text:p text:style-name="P21">Prayer</text:p>
                  </text:list-item>
                  <text:list-item>
                    <text:p text:style-name="P22">Submitting to God’s will</text:p>
                  </text:list-item>
                  <text:list-item>
                    <text:p text:style-name="P21">Studying God’s word</text:p>
                  </text:list-item>
                </text:list>
              </text:list-item>
            </text:list>
            <text:p text:style-name="P23"/>
            <text:p text:style-name="P24">Now that we know what to do how do we do it? We take what we’ve learned <text:span text:style-name="T58">from scripture </text:span>and we put it into practice.</text:p>
            <text:p text:style-name="P24"/>
            <text:p text:style-name="P25"><text:span text:style-name="T59">I</text:span>magine a scenario where someone tells you something and concludes with “it’s in the bible” but they don’t show you where it is. <text:span text:style-name="T60">Or, you see something on TV and they make a statement regarding doctrine (teachings) from the Bible. </text:span><text:span text:style-name="T61">Assume t</text:span>hey are implying that what they just told you is the truth. <text:span text:style-name="T61">Do you blindly accept it without question? What do you do when someone gives you any other advice? Do you check it against what you know? </text:span><text:span text:style-name="T62">Do you consult anyone else for advice? </text:span><text:span text:style-name="T63">Who is the expert on scripture? If His spirit is inside of us, do we need to go far for everything we need?</text:span></text:p>
            <text:p text:style-name="P25"/>
            <text:p text:style-name="P26"><text:span text:style-name="T61">What did Jesus do in </text:span><text:span text:style-name="T43">Matthew 4:5-7</text:span><text:span text:style-name="T61"> when the devil quoted two scripture verses (</text:span><text:span text:style-name="T43">Psalm 91:11,12</text:span><text:span text:style-name="T61">) </text:span><text:span text:style-name="T64">and </text:span><text:span text:style-name="T61">told Him to jump off the pinnacle of the temple? Did Jesus assume because the devil used scripture </text:span><text:span text:style-name="T65">that it was </text:span><text:span text:style-name="T64">ok to </text:span><text:span text:style-name="T61">jump? </text:span><text:span text:style-name="T66">Read it carefully and consider for yourself. </text:span><text:span text:style-name="T65">What Jesus did in that moment between the devil’s statement and His response is something </text:span><text:span text:style-name="T67">all </text:span><text:span text:style-name="T68">Christians should </text:span><text:span text:style-name="T65">endeavor to do.</text:span></text:p>
            <text:p text:style-name="P25"/>
            <text:p text:style-name="P27"><text:span text:style-name="T69">If the devil </text:span><text:span text:style-name="T70">tests</text:span><text:span text:style-name="T69"> you with scripture it </text:span><text:span text:style-name="T71">will</text:span><text:span text:style-name="T69"> likely </text:span><text:span text:style-name="T71">(</text:span><text:span text:style-name="T43">Genesis 3:1</text:span><text:span text:style-name="T71">) </text:span><text:span text:style-name="T69">sound a like a good idea (as he did with Jesus). Since the Holy Ghost indwells every reborn Christian we can </text:span><text:span text:style-name="T72">and should develop a habit of</text:span><text:span text:style-name="T69"> ask</text:span><text:span text:style-name="T72">ing</text:span><text:span text:style-name="T69"> Him </text:span><text:span text:style-name="T73">(prayer)</text:span><text:span text:style-name="T69">. </text:span><text:span text:style-name="T74">At other times,</text:span><text:span text:style-name="T75"> “</text:span><text:span text:style-name="T74">simple” </text:span><text:span text:style-name="T75">false teachings can be quickly discarded by the fact that they </text:span><text:span text:style-name="T74">obviously </text:span><text:span text:style-name="T75">contradict scripture</text:span><text:span text:style-name="T76">.</text:span></text:p>
            <text:p text:style-name="P27"><text:span text:style-name="T76"/></text:p>
            <text:p text:style-name="P28"><text:span text:style-name="T77">The key to understanding whether a teaching (doctrine) is </text:span><text:span text:style-name="T78">truth</text:span><text:span text:style-name="T77"> or not </text:span><text:span text:style-name="T78">is simple but it’s a habit that must be nurtured. </text:span><text:span text:style-name="T79">It involves both prayer and scripture</text:span><text:span text:style-name="T78">. A combination of prayer and study is </text:span><text:span text:style-name="T80">required</text:span><text:span text:style-name="T81"> </text:span><text:span text:style-name="T82">to avoid </text:span><text:span text:style-name="T83">common </text:span><text:span text:style-name="T82">mistakes such as leaning on your own understanding </text:span><text:span text:style-name="T83">(</text:span><text:span text:style-name="T43">Proverbs 3:5</text:span><text:span text:style-name="T83">) </text:span><text:span text:style-name="T82">or using the wisdom of the world </text:span><text:span text:style-name="T83">(</text:span><text:span text:style-name="T43">I Cor. 2:6,7</text:span><text:span text:style-name="T83">, </text:span><text:span text:style-name="T43">I Cor. 3:19a</text:span><text:span text:style-name="T83">).</text:span></text:p>
            <text:p text:style-name="P28"><text:span text:style-name="T83"/></text:p>
            <text:p text:style-name="P29"><text:span text:style-name="T84">The </text:span><text:span text:style-name="T85">truth </text:span><text:span text:style-name="T84">to all the questions </text:span><text:span text:style-name="T85">that </text:span><text:span text:style-name="T84">a Christian might have are found </text:span><text:span text:style-name="T86">while and by</text:span><text:span text:style-name="T84"> developing a </text:span><text:span text:style-name="T87">regular </text:span><text:span text:style-name="T84">habit of both prayer and study of scripture. </text:span><text:span text:style-name="T88">Not only did Jesus tell us </text:span><text:span text:style-name="T89">that </text:span><text:span text:style-name="T88">His Spirit would guide us into all truth but often </text:span><text:span text:style-name="T90">we are invited</text:span><text:span text:style-name="T88"> to partake of that wisdom (</text:span><text:span text:style-name="T43">Proverbs 3:15</text:span><text:span text:style-name="T91">, </text:span><text:span text:style-name="T43">Proverbs 9:1-6</text:span><text:span text:style-name="T92">, </text:span><text:span text:style-name="T43">Psalm 119:105</text:span><text:span text:style-name="T89">, </text:span><text:span text:style-name="T43">James 1:5</text:span><text:span text:style-name="T88">).</text:span></text:p>
          </table:table-cell>
        </table:table-row>
      </table:table>
      <table:table table:name="Table4" table:style-name="Table4">
        <table:table-column table:style-name="Table4.A"/>
        <table:table-row>
          <table:table-cell table:style-name="Table4.A1" office:value-type="string">
            <text:p text:style-name="P30">Hebrews 13:9b-9d</text:p>
            <text:p text:style-name="P31">For it is a good thing that the heart be established<text:span text:style-name="T93">G950</text:span> with grace<text:span text:style-name="T94">G5485</text:span>; not with meats, which have not profited them that have been occupied therein.</text:p>
          </table:table-cell>
        </table:table-row>
      </table:table>
      <text:p text:style-name="P2"/>
      <text:list text:style-name="L5">
        <text:list-item>
          <text:p text:style-name="P32"><text:span text:style-name="T95">Understanding the first part of </text:span><text:span text:style-name="T43">Hebrews 13:9</text:span><text:span text:style-name="T95"> is, as you might guess, very helpful in understanding the second part and the next verse also adds to our understanding.</text:span></text:p>
        </text:list-item>
        <text:list-item>
          <text:p text:style-name="P33"><text:span text:style-name="T96">To have your heart established </text:span><text:span text:style-name="T97">(to stabilitate, </text:span><text:span text:style-name="T98">to make stable, </text:span><text:span text:style-name="T97">to make firm, confirm, make sure) </text:span><text:span text:style-name="T96">is to be well grounded </text:span><text:span text:style-name="T99">(planted firmly) </text:span><text:span text:style-name="T96">in the truth (</text:span><text:span text:style-name="T100">G950, </text:span><text:span text:style-name="T43">Colossians 1:23</text:span><text:span text:style-name="T96">).</text:span></text:p>
        </text:list-item>
        <text:list-item>
          <text:p text:style-name="P34"><text:span text:style-name="T101">Generally, grace is the unmerited favor of God and that includes all His gifts </text:span><text:span text:style-name="T102">through Jesus Christ </text:span><text:span text:style-name="T101">and in this case </text:span><text:span text:style-name="T103">the </text:span><text:span text:style-name="T101">guidance He gives us </text:span><text:span text:style-name="T104">via the Spirit of truth </text:span><text:span text:style-name="T105">which we learned from </text:span><text:span text:style-name="T43">9a</text:span><text:span text:style-name="T105">.</text:span></text:p>
        </text:list-item>
        <text:list-item>
          <text:p text:style-name="P35">“Meats” <text:span text:style-name="T106">is plural for</text:span> food (<text:span text:style-name="T107">here, </text:span><text:span text:style-name="T108">collectively </text:span>referring to the bread and flesh used to sacrifice at the temple).</text:p>
        </text:list-item>
        <text:list-item>
          <text:p text:style-name="P36">We also learn that those sacrifices <text:span text:style-name="T109">are</text:span> no<text:span text:style-name="T110">t</text:span> profitable.</text:p>
        </text:list-item>
        <text:list-item>
          <text:p text:style-name="P37"><text:span text:style-name="T96">And so verse </text:span><text:span text:style-name="T43">9b-9d</text:span><text:span text:style-name="T96"> is </text:span><text:span text:style-name="T111">contrasting</text:span><text:span text:style-name="T96"> the </text:span><text:span text:style-name="T111">grace given by God to sacrifices. </text:span><text:span text:style-name="T112">The former is good and the latter is not </text:span><text:span text:style-name="T113">profitable (</text:span><text:span text:style-name="T114">vain, empty, </text:span><text:span text:style-name="T115">good for nothing, not good</text:span><text:span text:style-name="T113">).</text:span></text:p>
        </text:list-item>
      </text:list>
      <text:p text:style-name="P38"/>
      <table:table table:name="Table5" table:style-name="Table5">
        <table:table-column table:style-name="Table5.A"/>
        <table:table-row>
          <table:table-cell table:style-name="Table5.A1" office:value-type="string">
            <text:p text:style-name="P39">Hebrews 13:10</text:p>
            <text:p text:style-name="P40">We have an altar, whereof they have no right to eat which serve the tabernacle.</text:p>
          </table:table-cell>
        </table:table-row>
      </table:table>
      <text:p text:style-name="P38"/>
      <text:list text:style-name="L6">
        <text:list-item>
          <text:p text:style-name="P41">Those who serve the tabernacle are the Levite priests.</text:p>
        </text:list-item>
        <text:list-item>
          <text:p text:style-name="P42"><text:span text:style-name="T116">The contrast here is between the “old covenant” or the “old way” (sacrificing at the temple for sin, the law of Moses) and the “new covenant” or the new and living way (</text:span><text:span text:style-name="T43">Heb. 10:20</text:span><text:span text:style-name="T116">, </text:span><text:span text:style-name="T43">Matt. 26:28</text:span><text:span text:style-name="T116">, </text:span><text:span text:style-name="T43">Heb. 8:13</text:span><text:span text:style-name="T116">) </text:span><text:span text:style-name="T117">which is through Jesus Christ.</text:span></text:p>
        </text:list-item>
        <text:list-item>
          <text:p text:style-name="P43">Since they have no right to eat at our altar <text:span text:style-name="T118">(a place of sacrifice)</text:span>, an obvious interpretation becomes the contrast between those who are saved and those who are not. <text:span text:style-name="T119">Those without Jesus and those who approach God not through Jesus are separated from God and He will not hear them (</text:span><text:span text:style-name="T120">Isaiah 59:2</text:span><text:span text:style-name="T119">).</text:span></text:p>
        </text:list-item>
        <text:list-item>
          <text:p text:style-name="P44"><text:span text:style-name="T121">This verse </text:span><text:span text:style-name="T122">adds to our understand</text:span><text:span text:style-name="T123">ing</text:span><text:span text:style-name="T122"> of </text:span><text:span text:style-name="T124">9c</text:span><text:span text:style-name="T122"> by</text:span><text:span text:style-name="T121"> tell</text:span><text:span text:style-name="T122">ing</text:span><text:span text:style-name="T121"> us </text:span><text:span text:style-name="T122">which definition of “meats” we should use.</text:span></text:p>
          <text:list>
            <text:list-item>
              <text:p text:style-name="P44"><text:span text:style-name="T121">Besides food, meat </text:span><text:span text:style-name="T125">can </text:span><text:span text:style-name="T126">also </text:span><text:span text:style-name="T121">refer to scripture itself (</text:span><text:span text:style-name="T127">Hebrews 5:12,14</text:span><text:span text:style-name="T121">), </text:span><text:span text:style-name="T128">also known as</text:span><text:span text:style-name="T129"> the oracles of God.</text:span></text:p>
            </text:list-item>
          </text:list>
        </text:list-item>
      </text:list>
      <text:p text:style-name="P45"/>
      <text:p text:style-name="P45"/>
      <text:p text:style-name="P46"><text:span text:style-name="T130">All this considered, </text:span><text:span text:style-name="T127">Hebrews 13:9</text:span><text:span text:style-name="T130"> is </text:span><text:span text:style-name="T131">a command </text:span><text:span text:style-name="T130">to pray, submit to God’s will, and study scripture </text:span><text:span text:style-name="T131">because those are the requirements to </text:span><text:span text:style-name="T132">fulfill </text:span><text:span text:style-name="T131">the command: “</text:span><text:span text:style-name="T132">Be not carried about with divers and strange doctrines.”</text:span></text:p>
      <text:p text:style-name="P4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8">What?</text:p>
          </table:table-cell>
          <table:table-cell table:style-name="Table6.B1" table:number-columns-spanned="3" office:value-type="string">
            <text:p text:style-name="P49">Be not carried about with divers and strange doctrines.</text:p>
          </table:table-cell>
          <table:covered-table-cell/>
          <table:covered-table-cell/>
        </table:table-row>
        <table:table-row>
          <table:table-cell table:style-name="Table6.A2" office:value-type="string">
            <text:p text:style-name="P50">How?</text:p>
          </table:table-cell>
          <table:table-cell table:style-name="Table6.A2" office:value-type="string">
            <text:p text:style-name="P50">Pray</text:p>
          </table:table-cell>
          <table:table-cell table:style-name="Table6.A2" office:value-type="string">
            <text:p text:style-name="P50">Submit to God’s will</text:p>
          </table:table-cell>
          <table:table-cell table:style-name="Table6.D2" office:value-type="string">
            <text:p text:style-name="P50">Study scripture</text:p>
          </table:table-cell>
        </table:table-row>
      </table:table>
      <text:p text:style-name="P47"/>
      <text:p text:style-name="P47"/>
      <text:p text:style-name="P51"><text:span text:style-name="T133">P</text:span><text:span text:style-name="T134">ractice topics</text:span></text:p>
      <table:table table:name="Table2" table:style-name="Table2">
        <table:table-column table:style-name="Table2.A"/>
        <table:table-row>
          <table:table-cell table:style-name="Table2.A1" office:value-type="string">
            <text:p text:style-name="P52">Some popular false doctrines are:</text:p>
            <text:list text:style-name="L7">
              <text:list-item>
                <text:p text:style-name="P53">The more money you “give to God”, the more money He will give to you.</text:p>
              </text:list-item>
              <text:list-item>
                <text:p text:style-name="P53">You must behave a certain way to receive the gift of salvation.</text:p>
              </text:list-item>
              <text:list-item>
                <text:p text:style-name="P53">Handling deadly animals is a way to prove your faith.</text:p>
              </text:list-item>
              <text:list-item>
                <text:p text:style-name="P54">Christians <text:span text:style-name="T135">are </text:span><text:span text:style-name="T136">forbidden from </text:span><text:span text:style-name="T135">eat</text:span><text:span text:style-name="T136">ing</text:span><text:span text:style-name="T135"> </text:span>certain kinds of foods.</text:p>
              </text:list-item>
              <text:list-item>
                <text:p text:style-name="P53"><text:span text:style-name="T137">Praying</text:span> to or worshiping Mary is appropriate.</text:p>
              </text:list-item>
              <text:list-item>
                <text:p text:style-name="P53">Confessing your sins to a priest <text:span text:style-name="T138">and doing what he tells you can free you from the penalties</text:span>.</text:p>
              </text:list-item>
              <text:list-item>
                <text:p text:style-name="P55">Forbidding to marry is biblical.</text:p>
              </text:list-item>
              <text:list-item>
                <text:p text:style-name="P56">Sexual relations outside of marriage are <text:span text:style-name="T139">not sin</text:span> as long as they aren’t immoral.</text:p>
              </text:list-item>
            </text:list>
            <text:p text:style-name="P52"/>
            <text:p text:style-name="P52"><text:span text:style-name="T140">R</text:span>eborn Christians understandably have many different questions such as:</text:p>
            <text:list text:style-name="L8">
              <text:list-item>
                <text:p text:style-name="P57">Should a <text:span text:style-name="T141">male </text:span>Christian be circumcised?</text:p>
              </text:list-item>
              <text:list-item>
                <text:p text:style-name="P57">Should a Christian abstain from consuming blood?</text:p>
              </text:list-item>
              <text:list-item>
                <text:p text:style-name="P58">What are commands that apply to all Christians?</text:p>
              </text:list-item>
              <text:list-item>
                <text:p text:style-name="P57">Should a Christian honor the Sabbath and keep it holy?</text:p>
              </text:list-item>
              <text:list-item>
                <text:p text:style-name="P57">Is it ok for a Christian to marry a person who is not saved?</text:p>
              </text:list-item>
              <text:list-item>
                <text:p text:style-name="P57">How should a Christian dress, speak, conduct business, etc.?</text:p>
              </text:list-item>
              <text:list-item>
                <text:p text:style-name="P58">What <text:span text:style-name="T142">ministry has God called me to</text:span>?</text:p>
              </text:list-item>
              <text:list-item>
                <text:p text:style-name="P57">Why is it normal to expect to suffer persecution as a Christian?</text:p>
              </text:list-item>
              <text:list-item>
                <text:p text:style-name="P59">How do I know for sure that I am saved?</text:p>
              </text:list-item>
              <text:list-item>
                <text:p text:style-name="P60">What should a Christian do when they sin?</text:p>
              </text:list-item>
              <text:list-item>
                <text:p text:style-name="P61">If a law says something is ok does that mean it’s <text:span text:style-name="T143">ok to do it?</text:span></text:p>
              </text:list-item>
            </text:list>
          </table:table-cell>
        </table:table-row>
      </table:table>
      <text:p text:style-name="P62"/>
      <text:p text:style-name="P63"><text:span text:style-name="T144">Cross references (courtesy of </text:span><text:a xlink:type="simple" xlink:href="http://tsk-online.com/" text:style-name="Internet_20_link" text:visited-style-name="Visited_20_Internet_20_Link"><text:span text:style-name="T144">tsk-online.com</text:span></text:a><text:span text:style-name="T144">)</text:span></text:p>
      <table:table table:name="Table7" table:style-name="Table7">
        <table:table-column table:style-name="Table7.A"/>
        <table:table-column table:style-name="Table7.B"/>
        <table:table-row>
          <table:table-cell table:style-name="Table7.A1" office:value-type="string">
            <text:p text:style-name="P64">Hebrews 13:9a</text:p>
            <text:p text:style-name="P65"><text:span text:style-name="T145">(</text:span>carried<text:span text:style-name="T145">)</text:span></text:p>
          </table:table-cell>
          <table:table-cell table:style-name="Table7.B1" office:value-type="string">
            <text:p text:style-name="P66"><text:span text:style-name="T127">Matthew 24:4</text:span><text:span text:style-name="T146">, </text:span><text:span text:style-name="T127">Matthew 24:24</text:span><text:span text:style-name="T146">, </text:span><text:span text:style-name="T127">Acts 20:30</text:span><text:span text:style-name="T146">, </text:span><text:span text:style-name="T127">Romans 16:17,18</text:span><text:span text:style-name="T146">, </text:span><text:span text:style-name="T127">2 Corinthians 11:11-15</text:span><text:span text:style-name="T146">, </text:span><text:span text:style-name="T127">Galatians 1:6-9</text:span><text:span text:style-name="T146">, </text:span><text:span text:style-name="T127">Ephesians 4:14</text:span><text:span text:style-name="T146">, </text:span><text:span text:style-name="T127">Ephesians 5:6</text:span><text:span text:style-name="T146">, </text:span><text:span text:style-name="T127">Colossians 2:4</text:span><text:span text:style-name="T146">, </text:span><text:span text:style-name="T127">Colossians 2:8</text:span><text:span text:style-name="T146">, </text:span><text:span text:style-name="T127">2 Thessalonians 2:2</text:span><text:span text:style-name="T147">, </text:span><text:span text:style-name="T127">1 Timothy 4:1-3</text:span><text:span text:style-name="T147">, </text:span><text:span text:style-name="T127">1 Timothy 6:3-5</text:span><text:span text:style-name="T147">, </text:span><text:span text:style-name="T127">1 Timothy 6:20</text:span><text:span text:style-name="T147">, </text:span><text:span text:style-name="T127">1 John 4:1</text:span><text:span text:style-name="T147">, </text:span><text:span text:style-name="T127">Jude 1:3</text:span></text:p>
          </table:table-cell>
        </table:table-row>
        <table:table-row>
          <table:table-cell table:style-name="Table7.A2" office:value-type="string">
            <text:p text:style-name="P67">Hebrews 13:9b</text:p>
            <text:p text:style-name="P68">(it is)</text:p>
          </table:table-cell>
          <table:table-cell table:style-name="Table7.B2" office:value-type="string">
            <text:p text:style-name="P69"><text:span text:style-name="T127">Acts 20:32</text:span><text:span text:style-name="T148">, </text:span><text:span text:style-name="T127">2 Corinthians 1:21</text:span><text:span text:style-name="T148">, </text:span><text:span text:style-name="T127">Galatians 6:1</text:span><text:span text:style-name="T148">, </text:span><text:span text:style-name="T127">2 Thessalonians 2:17</text:span><text:span text:style-name="T148">, </text:span><text:span text:style-name="T127">2 Timothy 2:1,2</text:span></text:p>
          </table:table-cell>
        </table:table-row>
        <table:table-row>
          <table:table-cell table:style-name="Table7.A2" office:value-type="string">
            <text:p text:style-name="P70">Hebrews 13:9c</text:p>
            <text:p text:style-name="P68">(not with)</text:p>
          </table:table-cell>
          <table:table-cell table:style-name="Table7.B3" office:value-type="string">
            <text:p text:style-name="P71"><text:span text:style-name="T127">Hebrews 9:9,10</text:span><text:span text:style-name="T149">, </text:span><text:span text:style-name="T127">Leviticus 11:1-47</text:span><text:span text:style-name="T149">, </text:span><text:span text:style-name="T127">Deuteronomy 14:3-21</text:span><text:span text:style-name="T150">, </text:span><text:span text:style-name="T127">Acts 10:14-16</text:span><text:span text:style-name="T151">, </text:span><text:span text:style-name="T127">Romans 14:2</text:span><text:span text:style-name="T152">, </text:span><text:span text:style-name="T127">Romans 14:6</text:span><text:span text:style-name="T152">, </text:span><text:span text:style-name="T127">Romans 14:17</text:span><text:span text:style-name="T152">, </text:span><text:span text:style-name="T127">1 Corinthians 6:13</text:span><text:span text:style-name="T152">, </text:span><text:span text:style-name="T127">1 Corinthians 8:8</text:span><text:span text:style-name="T152">, </text:span><text:span text:style-name="T127">Colossians 2:16-20</text:span><text:span text:style-name="T152">, </text:span><text:span text:style-name="T127">1 Timothy 4:3-5</text:span><text:span text:style-name="T153">, </text:span><text:span text:style-name="T127">Titus 1:14,15</text:span></text:p>
          </table:table-cell>
        </table:table-row>
      </table:table>
      <text:p text:style-name="P72"/>
      <text:p text:style-name="P72"/>
      <text:p text:style-name="P72"/>
      <text:p text:style-name="P72"/>
      <text:p text:style-name="P72"/>
      <text:p text:style-name="P72"><text:soft-page-break/>Strongs #’s <text:span text:style-name="T154">referenced</text:span></text:p>
      <table:table table:name="Table1" table:style-name="Table1">
        <table:table-column table:style-name="Table1.A"/>
        <table:table-column table:style-name="Table1.B"/>
        <table:table-row>
          <table:table-cell table:style-name="Table1.A1" office:value-type="string">
            <text:p text:style-name="P73">G5485</text:p>
          </table:table-cell>
          <table:table-cell table:style-name="Table1.B1" office:value-type="string">
            <text:p text:style-name="P40">χάρις cháris, khar'-ece; from G5463; graciousness (as gratifying), of manner or act (abstract or concrete; literal, figurative or spiritual; especially the divine influence upon the heart, and its reflection in the life; including gratitude):—acceptable, benefit, favour, gift, grace(- ious), joy, liberality, pleasure, thank(-s, -worthy).</text:p>
          </table:table-cell>
        </table:table-row>
        <table:table-row>
          <table:table-cell table:style-name="Table1.A2" office:value-type="string">
            <text:p text:style-name="P74">G950</text:p>
          </table:table-cell>
          <table:table-cell table:style-name="Table1.B2" office:value-type="string">
            <text:p text:style-name="P40">βεβαιόω bebaióō, beb-ah-yo'-o; from G949; to stabilitate (figuratively):—confirm, (e-)stablish.</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5in" fo:margin-bottom="0.4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17T13:44:38.494564095</meta:creation-date>
    <dc:date>2026-07-11T12:21:11.253837339</dc:date>
    <meta:editing-duration>PT7H20M22S</meta:editing-duration>
    <meta:editing-cycles>266</meta:editing-cycles>
    <meta:generator>LibreOffice/26.2.4.2$Linux_X86_64 LibreOffice_project/64a984c51f4702dbd3710b13428c673a2f1292e7</meta:generator>
    <meta:document-statistic meta:table-count="7" meta:image-count="0" meta:object-count="0" meta:page-count="5" meta:paragraph-count="96" meta:word-count="1733" meta:character-count="9738" meta:non-whitespace-character-count="8156"/>
  </office:meta>
</office:document-meta>
</file>