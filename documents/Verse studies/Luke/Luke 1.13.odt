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37e5d" officeooo:paragraph-rsid="00137e5d"/>
    </style:style>
    <style:style style:name="P2" style:family="paragraph" style:parent-style-name="Table_20_Contents">
      <style:text-properties officeooo:rsid="00146e89" officeooo:paragraph-rsid="00146e89"/>
    </style:style>
    <style:style style:name="T1" style:family="text">
      <style:text-properties fo:color="#ff0000" loext:opacity="100%"/>
    </style:style>
    <style:style style:name="T2" style:family="text">
      <style:text-properties officeooo:rsid="0014c01c"/>
    </style:style>
    <style:style style:name="T3" style:family="text">
      <style:text-properties officeooo:rsid="00146e89"/>
    </style:style>
    <style:style style:name="T4" style:family="text">
      <style:text-properties officeooo:rsid="00154ad8"/>
    </style:style>
    <style:style style:name="T5" style:family="text">
      <style:text-properties officeooo:rsid="00137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forgot to mention this several times so here it is so I don’t forget again (even though you probably already noticed this)!</text:p>
      <text:p text:style-name="P1"/>
      <text:p text:style-name="P1">Luke 1:13<text:line-break/>But the angel said unto him, Fear not, Zacharias: for thy prayer is heard<text:span text:style-name="T1">;</text:span> and thy wife Elisabeth shall bear thee a son, and thou shalt call his name John.</text:p>
      <text:p text:style-name="P1"/>
      <text:p text:style-name="P1">This semi-colon matters.</text:p>
      <text:p text:style-name="P1"/>
      <text:p text:style-name="P1">Genesis 1:2 (first comma and semi-colon)<text:line-break/>And the earth was without form<text:span text:style-name="T1">,</text:span> and void<text:span text:style-name="T1">;</text:span> and darkness was upon the face of the deep. And the Spirit of God moved upon the face of the waters.</text:p>
      <text:p text:style-name="P1"/>
      <text:p text:style-name="P1">Both sides of the comma: both statements <text:span text:style-name="T2">are </text:span>about the same thing (much like the latter half of Luke 1:13).</text:p>
      <text:p text:style-name="P1"/>
      <text:p text:style-name="P1">Before the semi-colon: <text:span text:style-name="T3">dry land (didn’t exist yet; Gen 1:9)</text:span></text:p>
      <text:p text:style-name="P1">After the semi-colon: the face of the deep/the waters <text:span text:style-name="T3">(</text:span><text:span text:style-name="T2">AKA the great deep Gen 7:11, 8:2</text:span><text:span text:style-name="T3">)</text:span></text:p>
      <text:p text:style-name="P1"/>
      <text:p text:style-name="P2"><text:span text:style-name="T4">Thus we learn</text:span> that the semi-colon <text:span text:style-name="T4">is used to </text:span>separate distinct, but related ideas. <text:span text:style-name="T5">The </text:span>relation<text:span text:style-name="T5"> in Luke 1:13 </text:span>on both sides of the semi-colon is Zacharias (thy, thy, thee, thou). The relation in Genesis 1:2 is what we might call “the earth as a whole”.</text:p>
      <text:p text:style-name="P2"/>
      <text:p text:style-name="Table_20_Contents">Revelation 21:<text:span text:style-name="T2">19,20 is also a great example for commas and semi-colons but I wanted to look at the first.</text:span></text:p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4:17:59.809200300</meta:creation-date>
    <dc:title>default</dc:title>
    <meta:editing-duration>PT20M40S</meta:editing-duration>
    <meta:editing-cycles>2</meta:editing-cycles>
    <meta:generator>LibreOffice/25.8.3.2$Windows_X86_64 LibreOffice_project/8ca8d55c161d602844f5428fa4b58097424e324e</meta:generator>
    <meta:initial-creator>William K. McDannell Jr.</meta:initial-creator>
    <dc:date>2025-12-07T15:10:39.394553600</dc:date>
    <dc:creator>William K. McDannell Jr.</dc:creator>
    <meta:document-statistic meta:table-count="0" meta:image-count="0" meta:object-count="0" meta:page-count="1" meta:paragraph-count="9" meta:word-count="204" meta:character-count="1107" meta:non-whitespace-character-count="912"/>
    <meta:template xlink:type="simple" xlink:actuate="onRequest" xlink:title="default" xlink:href="../../../../../../AppData/Roaming/LibreOffice/4/user/template/default.ott" meta:date="2025-12-07T14:17:58.850110200"/>
  </office:meta>
</office:document-meta>
</file>