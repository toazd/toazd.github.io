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127622" loext:opacity="100%" style:font-name="Liberation Sans" fo:font-size="13pt" fo:font-weight="bold" style:font-size-asian="11.3500003814697pt" style:font-weight-asian="bold" style:font-size-complex="13pt" style:font-weight-complex="bold"/>
    </style:style>
    <style:style style:name="P2" style:family="paragraph" style:parent-style-name="Standard">
      <style:text-properties style:font-name="Liberation Sans" fo:font-size="13pt" style:font-size-asian="11.3500003814697pt" style:font-size-complex="13pt"/>
    </style:style>
    <style:style style:name="P3" style:family="paragraph" style:parent-style-name="Standard">
      <style:text-properties style:font-name="Liberation Sans" fo:font-size="13pt" officeooo:rsid="000c0a9b" officeooo:paragraph-rsid="000c0a9b" style:font-size-asian="11.3500003814697pt" style:font-size-complex="13pt"/>
    </style:style>
    <style:style style:name="P4" style:family="paragraph" style:parent-style-name="Standard">
      <style:text-properties fo:color="#127622" loext:opacity="100%" style:font-name="Liberation Sans" fo:font-size="13pt" officeooo:rsid="000676c5" officeooo:paragraph-rsid="000676c5" style:font-size-asian="11.3500003814697pt" style:font-size-complex="13pt"/>
    </style:style>
    <style:style style:name="P5" style:family="paragraph" style:parent-style-name="Standard">
      <style:text-properties fo:color="#ff0000" loext:opacity="100%" style:font-name="Liberation Sans" fo:font-size="13pt" officeooo:rsid="000676c5" officeooo:paragraph-rsid="000676c5" style:font-size-asian="11.3500003814697pt" style:font-size-complex="13pt"/>
    </style:style>
    <style:style style:name="P6" style:family="paragraph" style:parent-style-name="Standard">
      <style:text-properties style:font-name="Liberation Sans" fo:font-size="13pt" officeooo:rsid="000676c5" officeooo:paragraph-rsid="000676c5" style:font-size-asian="11.3500003814697pt" style:font-size-complex="13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tthew 28:18</text:p>
      <text:p text:style-name="P2">And Jesus came and spake unto them, saying, All power is given unto me in heaven and in earth.</text:p>
      <text:p text:style-name="P2"/>
      <text:p text:style-name="P3">To the 11 disciples on a mountain in Galilee.</text:p>
      <text:p text:style-name="P2"/>
      <text:p text:style-name="P4">John 17:2</text:p>
      <text:p text:style-name="P5">As thou hast given him power over all flesh, that he should give eternal life to as many as thou hast given him.</text:p>
      <text:p text:style-name="P6"/>
      <text:p text:style-name="P4">Ephesians 1:22</text:p>
      <text:p text:style-name="P6">And hath put all things under his feet, and gave him to be the head over all things to the church,</text:p>
      <text:p text:style-name="P6"/>
      <text:p text:style-name="P4">Psalm 110:1</text:p>
      <text:p text:style-name="P6">The LORD said unto my Lord, Sit thou at my right hand, until I make thine enemies thy footstool.</text:p>
      <text:p text:style-name="P6"/>
      <text:p text:style-name="P4">1 Corinthians 15:24-25</text:p>
      <text:p text:style-name="P6">Then cometh the end, when he shall have delivered up the kingdom to God, even the Father; when he shall have put down all rule and all authority and power. [25] For he must reign, till he hath put all enemies under his feet.</text:p>
      <text:p text:style-name="P6"/>
      <text:p text:style-name="P4">1 Corinthians 15:28</text:p>
      <text:p text:style-name="P6">And when all things shall be subdued unto him, then shall the Son also himself be subject unto him that put all things under him, that God may be all in all.</text:p>
      <text:p text:style-name="P6"/>
      <text:p text:style-name="P4">John 5:22</text:p>
      <text:p text:style-name="P5">For the Father judgeth no man, but hath committed all judgment unto the S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1-27T15:05:31.654714350</meta:creation-date>
    <dc:date>2026-07-11T12:21:11.724902365</dc:date>
    <meta:editing-duration>PT11M43S</meta:editing-duration>
    <meta:editing-cycles>10</meta:editing-cycles>
    <meta:generator>LibreOffice/26.2.4.2$Linux_X86_64 LibreOffice_project/64a984c51f4702dbd3710b13428c673a2f1292e7</meta:generator>
    <meta:document-statistic meta:table-count="0" meta:image-count="0" meta:object-count="0" meta:page-count="1" meta:paragraph-count="15" meta:word-count="197" meta:character-count="999" meta:non-whitespace-character-count="817"/>
  </office:meta>
</office:document-meta>
</file>