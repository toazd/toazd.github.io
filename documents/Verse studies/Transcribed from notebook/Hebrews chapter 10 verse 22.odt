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3200000342443B14F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3pt" style:font-size-asian="13pt" style:font-size-complex="13pt"/>
    </style:style>
    <style:style style:name="P2" style:family="paragraph" style:parent-style-name="Standard">
      <style:text-properties fo:color="#127622" loext:opacity="100%" style:font-name="Liberation Sans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text-properties style:font-name="Liberation Sans" fo:font-size="13pt" officeooo:paragraph-rsid="0025564e" style:font-size-asian="13pt" style:font-size-complex="13pt"/>
    </style:style>
    <style:style style:name="P4" style:family="paragraph" style:parent-style-name="Standard" style:list-style-name="L1">
      <style:text-properties style:font-name="Liberation Sans" fo:font-size="13pt" officeooo:rsid="0025564e" officeooo:paragraph-rsid="0025564e" style:font-size-asian="13pt" style:font-size-complex="13pt"/>
    </style:style>
    <style:style style:name="P5" style:family="paragraph" style:parent-style-name="Standard" style:list-style-name="L1">
      <style:text-properties style:font-name="Liberation Sans" fo:font-size="13pt" officeooo:rsid="0026d5c1" officeooo:paragraph-rsid="0026d5c1" style:font-size-asian="13pt" style:font-size-complex="13pt"/>
    </style:style>
    <style:style style:name="P6" style:family="paragraph" style:parent-style-name="Standard" style:list-style-name="L1">
      <style:text-properties style:font-name="Liberation Sans" fo:font-size="13pt" officeooo:rsid="0027f36f" officeooo:paragraph-rsid="002a26f5" style:font-size-asian="13pt" style:font-size-complex="13pt"/>
    </style:style>
    <style:style style:name="P7" style:family="paragraph" style:parent-style-name="Standard" style:list-style-name="L1">
      <style:text-properties style:font-name="Liberation Sans" fo:font-size="13pt" officeooo:rsid="002b5a9e" officeooo:paragraph-rsid="002b5a9e" style:font-size-asian="13pt" style:font-size-complex="13pt"/>
    </style:style>
    <style:style style:name="P8" style:family="paragraph" style:parent-style-name="Standard" style:list-style-name="L1">
      <style:text-properties style:font-name="Liberation Sans" fo:font-size="13pt" officeooo:rsid="002cda11" officeooo:paragraph-rsid="002cda11" style:font-size-asian="13pt" style:font-size-complex="13pt"/>
    </style:style>
    <style:style style:name="P9" style:family="paragraph" style:parent-style-name="Standard">
      <style:text-properties style:font-name="Liberation Sans" fo:font-size="13pt" officeooo:rsid="002cda11" officeooo:paragraph-rsid="002cda11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3pt" officeooo:rsid="002eb7c7" officeooo:paragraph-rsid="002eb7c7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3pt" officeooo:rsid="002eb7c7" officeooo:paragraph-rsid="002eb7c7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3pt" officeooo:rsid="002ecdab" officeooo:paragraph-rsid="002ecdab" style:font-size-asian="13pt" style:font-size-complex="13pt"/>
    </style:style>
    <style:style style:name="P13" style:family="paragraph" style:parent-style-name="Table_20_Contents">
      <style:text-properties style:font-name="Liberation Sans" fo:font-size="13pt" officeooo:rsid="002ecdab" officeooo:paragraph-rsid="002ecdab" style:font-size-asian="13pt" style:font-size-complex="13pt"/>
    </style:style>
    <style:style style:name="P14" style:family="paragraph" style:parent-style-name="Table_20_Contents">
      <style:text-properties style:font-name="Liberation Sans" fo:font-size="13pt" style:font-size-asian="13pt" style:font-size-complex="13pt"/>
    </style:style>
    <style:style style:name="P15" style:family="paragraph" style:parent-style-name="Standard">
      <style:text-properties style:font-name="Liberation Sans" fo:font-size="13pt" officeooo:rsid="002eb7c7" officeooo:paragraph-rsid="002eb7c7" style:font-size-asian="13pt" style:font-size-complex="13pt"/>
    </style:style>
    <style:style style:name="P16" style:family="paragraph" style:parent-style-name="Standard">
      <style:text-properties style:font-name="Liberation Sans" fo:font-size="13pt" officeooo:rsid="0025564e" officeooo:paragraph-rsid="0025564e" style:font-size-asian="13pt" style:font-size-complex="13pt"/>
    </style:style>
    <style:style style:name="P17" style:family="paragraph" style:parent-style-name="Standard">
      <style:text-properties style:font-name="Liberation Sans" fo:font-size="13pt" officeooo:rsid="00331eae" officeooo:paragraph-rsid="00331eae" style:font-size-asian="13pt" style:font-size-complex="13pt"/>
    </style:style>
    <style:style style:name="P18" style:family="paragraph" style:parent-style-name="Standard">
      <style:text-properties style:font-name="Liberation Sans" fo:font-size="13pt" officeooo:rsid="00345d70" officeooo:paragraph-rsid="00345d70" style:font-size-asian="13pt" style:font-size-complex="13pt"/>
    </style:style>
    <style:style style:name="P19" style:family="paragraph" style:parent-style-name="Standard">
      <style:paragraph-properties fo:break-before="page"/>
      <style:text-properties style:font-name="Liberation Sans" fo:font-size="13pt" style:text-underline-style="solid" style:text-underline-width="auto" style:text-underline-color="font-color" officeooo:rsid="0025564e" officeooo:paragraph-rsid="0025564e" style:font-size-asian="13pt" style:font-size-complex="13pt"/>
    </style:style>
    <style:style style:name="P20" style:family="paragraph" style:parent-style-name="Standard">
      <style:text-properties style:font-name="Liberation Sans" fo:font-size="13pt" style:text-underline-style="none" officeooo:rsid="0025564e" officeooo:paragraph-rsid="0025564e" style:font-size-asian="13pt" style:font-size-complex="13pt"/>
    </style:style>
    <style:style style:name="P21" style:family="paragraph" style:parent-style-name="Standard">
      <style:text-properties style:font-name="Liberation Sans" fo:font-size="13pt" style:text-underline-style="none" officeooo:rsid="0038d321" officeooo:paragraph-rsid="0038d321" style:font-size-asian="13pt" style:font-size-complex="13pt"/>
    </style:style>
    <style:style style:name="P22" style:family="paragraph" style:parent-style-name="Standard">
      <style:text-properties fo:color="#127622" loext:opacity="100%" style:font-name="Liberation Sans" fo:font-size="13pt" style:text-underline-style="none" officeooo:rsid="0025564e" officeooo:paragraph-rsid="0038d321" style:font-size-asian="13pt" style:font-size-complex="13pt"/>
    </style:style>
    <style:style style:name="P23" style:family="paragraph" style:parent-style-name="Standard">
      <style:text-properties style:font-name="Liberation Sans" fo:font-size="13pt" style:text-underline-style="none" officeooo:rsid="003a379a" officeooo:paragraph-rsid="003a379a" style:font-size-asian="13pt" style:font-size-complex="13pt"/>
    </style:style>
    <style:style style:name="T1" style:family="text">
      <style:text-properties officeooo:rsid="0025564e"/>
    </style:style>
    <style:style style:name="T2" style:family="text">
      <style:text-properties fo:color="#127622" loext:opacity="100%" officeooo:rsid="0025564e"/>
    </style:style>
    <style:style style:name="T3" style:family="text">
      <style:text-properties fo:color="#127622" loext:opacity="100%"/>
    </style:style>
    <style:style style:name="T4" style:family="text">
      <style:text-properties officeooo:rsid="0029d6fb"/>
    </style:style>
    <style:style style:name="T5" style:family="text">
      <style:text-properties officeooo:rsid="002947a1"/>
    </style:style>
    <style:style style:name="T6" style:family="text">
      <style:text-properties officeooo:rsid="002c085c"/>
    </style:style>
    <style:style style:name="T7" style:family="text">
      <style:text-properties officeooo:rsid="00331eae"/>
    </style:style>
    <style:style style:name="T8" style:family="text">
      <style:text-properties officeooo:rsid="003359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2.4528in" draw:z-index="0"><draw:image xlink:href="Pictures/100000000000093200000342443B14F3.jpg" xlink:type="simple" xlink:show="embed" xlink:actuate="onLoad" draw:mime-type="image/jpeg"/></draw:frame></text:p>
      <text:p text:style-name="P2">Hebrews 10:22</text:p>
      <text:p text:style-name="P1">Let us draw near with a true heart in full assurance of faith, having our hearts sprinkled from an evil conscience, and our bodies washed with pure water.</text:p>
      <text:p text:style-name="P1"/>
      <text:list text:style-name="L1">
        <text:list-item>
          <text:p text:style-name="P3"><text:span text:style-name="T1">Read </text:span><text:span text:style-name="T2">Hebrews 10:19-22</text:span><text:span text:style-name="T1"> (one sentence)</text:span></text:p>
        </text:list-item>
        <text:list-item>
          <text:p text:style-name="P4"><text:span text:style-name="T3">Exodus 25-31</text:span>, <text:span text:style-name="T3">35-50</text:span> – Instructions for building &amp; using the tabernacle.</text:p>
        </text:list-item>
        <text:list-item>
          <text:p text:style-name="P4"><text:span text:style-name="T3">Hebrews 11:4</text:span>, <text:span text:style-name="T3">Genesis 4:4</text:span> – First sacrifices in scripture.</text:p>
        </text:list-item>
        <text:list-item>
          <text:p text:style-name="P5"><text:span text:style-name="T2">John 14:6</text:span> – The new and living way (<text:span text:style-name="T2">Hebrews 10:20</text:span>).</text:p>
        </text:list-item>
        <text:list-item>
          <text:p text:style-name="P6"><text:span text:style-name="T2">Exodus 26:33</text:span> - The <text:span text:style-name="T4">vail</text:span> in the tabernacle separated the holy place from the most holy place (AKA Holy of hol<text:span text:style-name="T5">i</text:span>es).</text:p>
        </text:list-item>
        <text:list-item>
          <text:p text:style-name="P7"><text:span text:style-name="T2">Exodus 29:4</text:span> – Part of the ceremony of hallowing <text:span text:style-name="T6">the </text:span>priests was to wash them with water.</text:p>
        </text:list-item>
        <text:list-item>
          <text:p text:style-name="P8"><text:span text:style-name="T2">Leviticus 21</text:span> – Rules for priests, definition of “high priest” (v<text:span text:style-name="T2">10</text:span>)</text:p>
        </text:list-item>
      </text:list>
      <text:p text:style-name="P9"/>
      <text:p text:style-name="P10">Hebrews 10:22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G228</text:p>
            <text:p text:style-name="P12">true</text:p>
          </table:table-cell>
          <table:table-cell table:style-name="Table1.B1" office:value-type="string">
            <text:p text:style-name="P13">ἀληθινός alēthinós, al-ay-thee-nos'; from G227; truthful:—true.</text:p>
          </table:table-cell>
        </table:table-row>
        <table:table-row>
          <table:table-cell table:style-name="Table1.A2" office:value-type="string">
            <text:p text:style-name="P12">G4136</text:p>
            <text:p text:style-name="P12">assurance</text:p>
          </table:table-cell>
          <table:table-cell table:style-name="Table1.B2" office:value-type="string">
            <text:p text:style-name="P14">πληροφορία plērophoría, play-rof-or-ee'-ah; from G4135; entire confidence:—(full) assurance.</text:p>
          </table:table-cell>
        </table:table-row>
      </table:table>
      <text:p text:style-name="P15"/>
      <text:p text:style-name="P16">“<text:span text:style-name="T7">sprinkled”</text:span></text:p>
      <text:p text:style-name="P17">After the 10 commandments &amp; law were given to Moses &amp; the children of Israel (<text:span text:style-name="T2">Ex. 20-23</text:span>) &amp; the people agreed with the LORD (<text:span text:style-name="T2">Ex. 24:3</text:span>). Moses built an altar (<text:span text:style-name="T2">Ex. 24:4</text:span>). He sent young men of the children of Israel which offered burnt offerings &amp; peace offerings (<text:span text:style-name="T2">Ex. 24:5</text:span>). <text:span text:style-name="T8">Half of the blood was sprinkled on the altar (</text:span><text:span text:style-name="T2">Ex. 24:6</text:span><text:span text:style-name="T8">). Moses then read the book of the covenant and the audience of the people agreed (</text:span><text:span text:style-name="T2">Ex. 24:7</text:span><text:span text:style-name="T8">). Then, Moses took the other half of the blood in the basons and sprinkled it on the people (</text:span><text:span text:style-name="T2">Ex. 24:8</text:span><text:span text:style-name="T8">).</text:span></text:p>
      <text:p text:style-name="P17"/>
      <text:p text:style-name="P18">Read <text:span text:style-name="T2">Hebrews 10:1-18</text:span></text:p>
      <text:p text:style-name="P19">Notes on back</text:p>
      <text:p text:style-name="P20"/>
      <text:p text:style-name="P21"><text:span text:style-name="T2">Leviticus 16</text:span> – Day of atonement / Yom Kippur / holy convocation (<text:span text:style-name="T2">Lev. 23:27</text:span>)</text:p>
      <text:p text:style-name="P21"/>
      <text:p text:style-name="P21">Summary:</text:p>
      <text:p text:style-name="P21">Once per year on the tenth day of the seventh month (Tishrei) the high priest would offer sacrifices for himself and the children of Israel.</text:p>
      <text:p text:style-name="P21"/>
      <text:p text:style-name="P21">10 Tishrei corresponds roughly to September-October</text:p>
      <text:p text:style-name="P21"/>
      <text:p text:style-name="P22">Leviticus 16:31</text:p>
      <text:p text:style-name="P21">It was also a sabbath rest day and everyone was required to “afflict your souls” (fast). The penalty for disobeying was death. (<text:span text:style-name="T2">Lev. 23:28-30</text:span>).</text:p>
      <text:p text:style-name="P21"/>
      <text:p text:style-name="P23"><text:span text:style-name="T2">Isaiah 58:3</text:span>, <text:span text:style-name="T2">58:5</text:span>, <text:span text:style-name="T2">58:10</text:span> (afflicting soul ~ fasting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27T15:05:31.654714350</meta:creation-date>
    <dc:date>2026-07-11T12:21:12.774558193</dc:date>
    <meta:editing-duration>PT1H55S</meta:editing-duration>
    <meta:editing-cycles>51</meta:editing-cycles>
    <meta:generator>LibreOffice/26.2.4.2$Linux_X86_64 LibreOffice_project/64a984c51f4702dbd3710b13428c673a2f1292e7</meta:generator>
    <meta:document-statistic meta:table-count="1" meta:image-count="1" meta:object-count="0" meta:page-count="2" meta:paragraph-count="27" meta:word-count="322" meta:character-count="1898" meta:non-whitespace-character-count="1606"/>
  </office:meta>
</office:document-meta>
</file>