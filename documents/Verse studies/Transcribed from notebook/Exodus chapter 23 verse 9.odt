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127622" loext:opacity="100%" style:font-name="Liberation Sans" fo:font-size="13pt" fo:font-weight="bold" officeooo:rsid="00132e41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style:use-window-font-color="true" loext:opacity="0%" style:font-name="Liberation Sans" fo:font-size="13pt" officeooo:rsid="000676c5" style:font-size-asian="11.3500003814697pt" style:font-size-complex="13pt"/>
    </style:style>
    <style:style style:name="P3" style:family="paragraph" style:parent-style-name="Standard">
      <style:text-properties style:use-window-font-color="true" loext:opacity="0%" style:font-name="Liberation Sans" fo:font-size="13pt" officeooo:rsid="00126c20" officeooo:paragraph-rsid="00126c20" style:font-size-asian="11.3500003814697pt" style:font-size-complex="13pt"/>
    </style:style>
    <style:style style:name="P4" style:family="paragraph" style:parent-style-name="Standard">
      <style:text-properties style:use-window-font-color="true" loext:opacity="0%" style:font-name="Liberation Sans" fo:font-size="13pt" officeooo:rsid="00132e41" officeooo:paragraph-rsid="00132e41" style:font-size-asian="11.3500003814697pt" style:font-size-complex="13pt"/>
    </style:style>
    <style:style style:name="P5" style:family="paragraph" style:parent-style-name="Standard">
      <style:text-properties fo:color="#127622" loext:opacity="100%" style:font-name="Liberation Sans" fo:font-size="13pt" officeooo:rsid="00132e41" officeooo:paragraph-rsid="00132e41" style:font-size-asian="11.3500003814697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3pt" officeooo:rsid="00132e41" officeooo:paragraph-rsid="00132e41" style:font-size-asian="11.3500003814697pt" style:font-size-complex="13pt"/>
    </style:style>
    <style:style style:name="P7" style:family="paragraph" style:parent-style-name="Table_20_Contents">
      <style:text-properties style:font-name="Liberation Sans" fo:font-size="13pt" style:font-size-asian="11.3500003814697pt" style:font-size-complex="13pt"/>
    </style:style>
    <style:style style:name="T1" style:family="text">
      <style:text-properties fo:color="#127622" loext:opacity="100%" officeooo:rsid="00132e41"/>
    </style:style>
    <style:style style:name="T2" style:family="text">
      <style:text-properties fo:color="#127622" loext:opacity="100%"/>
    </style:style>
    <style:style style:name="T3" style:family="text">
      <style:text-properties style:text-position="super 58%"/>
    </style:style>
    <style:style style:name="T4" style:family="text">
      <style:text-properties officeooo:rsid="0014fbe0"/>
    </style:style>
    <style:style style:name="T5" style:family="text">
      <style:text-properties officeooo:rsid="0014e898"/>
    </style:style>
    <style:style style:name="T6" style:family="text">
      <style:text-properties style:text-position="super 58%" officeooo:rsid="0014e898"/>
    </style:style>
    <style:style style:name="T7" style:family="text">
      <style:text-properties style:text-position="super 58%" officeooo:rsid="0014fb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odus 23:9</text:p>
      <text:p text:style-name="P2">Also thou shalt not oppress a stranger: for ye know the heart of a stranger, seeing ye were strangers in the land of Egypt.</text:p>
      <text:p text:style-name="P2"/>
      <text:p text:style-name="P3">Location: Mount Sinai (<text:span text:style-name="T1">Exodus 19:18</text:span>)</text:p>
      <text:p text:style-name="P4">Context: <text:span text:style-name="T2">Exodus 20:22</text:span></text:p>
      <text:p text:style-name="P4"/>
      <text:p text:style-name="P5">Exodus 20:22</text:p>
      <text:p text:style-name="P4">And the LORD said unto Moses, Thus thou shalt say unto the children of Israel, Ye have seen that I have talked with you from heaven.</text:p>
      <text:p text:style-name="P4"/>
      <text:p text:style-name="P4">“Stranger” (1<text:span text:style-name="T3">st</text:span> occurrence): <text:span text:style-name="T2">Genesis 15:13</text:span> (<text:span text:style-name="T4">s</text:span>trongs H1616)</text:p>
      <text:p text:style-name="P4">“<text:span text:style-name="T5">oppress” (1</text:span><text:span text:style-name="T6">st</text:span><text:span text:style-name="T5"> occurrence): </text:span><text:span text:style-name="T2">Exodus 3:9</text:span><text:span text:style-name="T5">, Read </text:span><text:span text:style-name="T2">Ex. 1:1</text:span><text:span text:style-name="T5"> → </text:span><text:span text:style-name="T2">Ex. 1:22</text:span><text:span text:style-name="T5"> (</text:span><text:span text:style-name="T4">s</text:span><text:span text:style-name="T5">trongs H3905)</text:span></text:p>
      <text:p text:style-name="P4">“<text:span text:style-name="T4">heart” (1</text:span><text:span text:style-name="T7">st</text:span><text:span text:style-name="T4"> occurrence): </text:span><text:span text:style-name="T2">Genesis 6:5</text:span><text:span text:style-name="T4"> (strongs H3820)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H1616</text:p>
          </table:table-cell>
          <table:table-cell table:style-name="Table1.B1" office:value-type="string">
            <text:p text:style-name="P7">גֵּר gêr, gare; or (fully) geyr (gare); from H1481; properly, a guest; by implication, a foreigner:—alien, sojourner, stranger.</text:p>
          </table:table-cell>
        </table:table-row>
        <table:table-row>
          <table:table-cell table:style-name="Table1.A2" office:value-type="string">
            <text:p text:style-name="P6">H3905</text:p>
          </table:table-cell>
          <table:table-cell table:style-name="Table1.B2" office:value-type="string">
            <text:p text:style-name="P7">לָחַץ lâchats, law-khats'; a primitive root; properly, to press, i.e. (figuratively) to distress:—afflict, crush, force, hold fast, oppress(-or), thrust self.</text:p>
          </table:table-cell>
        </table:table-row>
        <table:table-row>
          <table:table-cell table:style-name="Table1.A2" office:value-type="string">
            <text:p text:style-name="P6">H3820</text:p>
          </table:table-cell>
          <table:table-cell table:style-name="Table1.B3" office:value-type="string">
            <text:p text:style-name="P7">לֵב lêb, labe; a form of H3824; the heart; also used (figuratively) very widely for the feelings, the will and even the intellect; likewise for the centre of anything:—care for, comfortably, consent, × considered, courag(-eous), friend(-ly), ((broken-), (hard-), (merry-), (stiff-), (stout-), double) heart(-ed), × heed, × I, kindly, midst, mind(-ed), × regard(-ed), × themselves, × unawares, understanding, × well, willingly, wisdom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27T15:05:31.654714350</meta:creation-date>
    <dc:date>2026-07-11T12:31:30.585473091</dc:date>
    <meta:editing-duration>PT20M30S</meta:editing-duration>
    <meta:editing-cycles>20</meta:editing-cycles>
    <meta:generator>LibreOffice/26.2.4.2$Linux_X86_64 LibreOffice_project/64a984c51f4702dbd3710b13428c673a2f1292e7</meta:generator>
    <meta:document-statistic meta:table-count="1" meta:image-count="0" meta:object-count="0" meta:page-count="1" meta:paragraph-count="15" meta:word-count="194" meta:character-count="1254" meta:non-whitespace-character-count="1078"/>
  </office:meta>
</office:document-meta>
</file>