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Sans-Regular" svg:font-family="LiberationSans-Regular, sans-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7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75pt solid #000000"/>
    </style:style>
    <style:style style:name="Table3" style:family="table">
      <style:table-properties style:width="5.625in" fo:margin-left="1.075in" table:align="left"/>
    </style:style>
    <style:style style:name="Table3.A" style:family="table-column">
      <style:table-column-properties style:column-width="2.875in"/>
    </style:style>
    <style:style style:name="Table3.B" style:family="table-column">
      <style:table-column-properties style:column-width="2.75in"/>
    </style:style>
    <style:style style:name="Table3.A1" style:family="table-cell">
      <style:table-cell-properties fo:padding="0.0382in" fo:border-left="0.75pt solid #000000" fo:border-right="none" fo:border-top="0.75pt solid #000000" fo:border-bottom="0.75pt solid #000000"/>
    </style:style>
    <style:style style:name="Table3.B1" style:family="table-cell">
      <style:table-cell-properties fo:padding="0.0382in" fo:border="0.75pt solid #000000"/>
    </style:style>
    <style:style style:name="Table3.A2" style:family="table-cell">
      <style:table-cell-properties fo:padding="0.0382in" fo:border-left="0.75pt solid #000000" fo:border-right="none" fo:border-top="none" fo:border-bottom="0.75pt solid #000000"/>
    </style:style>
    <style:style style:name="Table3.B2" style:family="table-cell">
      <style:table-cell-properties fo:padding="0.0382in" fo:border-left="0.75pt solid #000000" fo:border-right="0.75pt solid #000000" fo:border-top="none" fo:border-bottom="0.75pt solid #000000"/>
    </style:style>
    <style:style style:name="Table4" style:family="table">
      <style:table-properties style:width="3.4167in" fo:margin-left="2.2486in" fo:break-before="page" table:align="left"/>
    </style:style>
    <style:style style:name="Table4.A" style:family="table-column">
      <style:table-column-properties style:column-width="3.4167in"/>
    </style:style>
    <style:style style:name="Table4.A1" style:family="table-cell">
      <style:table-cell-properties fo:padding="0.0382in" fo:border="0.75pt solid #000000"/>
    </style:style>
    <style:style style:name="Table5" style:family="table">
      <style:table-properties style:width="3.4167in" fo:margin-left="2.2486in" fo:break-before="page" table:align="left"/>
    </style:style>
    <style:style style:name="Table5.A" style:family="table-column">
      <style:table-column-properties style:column-width="3.4167in"/>
    </style:style>
    <style:style style:name="Table5.A1" style:family="table-cell">
      <style:table-cell-properties fo:padding="0.0382in" fo:border="0.75pt solid #000000"/>
    </style:style>
    <style:style style:name="Table6" style:family="table">
      <style:table-properties style:width="7.9in" fo:break-before="page" table:align="margins"/>
    </style:style>
    <style:style style:name="Table6.A" style:family="table-column">
      <style:table-column-properties style:column-width="3.9167in" style:rel-column-width="32490*"/>
    </style:style>
    <style:style style:name="Table6.B" style:family="table-column">
      <style:table-column-properties style:column-width="3.9833in" style:rel-column-width="33045*"/>
    </style:style>
    <style:style style:name="Table6.A1" style:family="table-cell">
      <style:table-cell-properties fo:padding="0.0382in" fo:border="0.75pt solid #000000"/>
    </style:style>
    <style:style style:name="Table6.A2" style:family="table-cell">
      <style:table-cell-properties fo:padding="0.0382in" fo:border-left="0.75pt solid #000000" fo:border-right="none" fo:border-top="none" fo:border-bottom="0.75pt solid #000000"/>
    </style:style>
    <style:style style:name="Table6.B2" style:family="table-cell">
      <style:table-cell-properties fo:padding="0.0382in" fo:border-left="0.75pt solid #000000" fo:border-right="0.75pt solid #000000" fo:border-top="none" fo:border-bottom="0.75pt solid #000000"/>
    </style:style>
    <style:style style:name="Table6.3" style:family="table-row">
      <style:table-row-properties style:min-row-height="0.2875in"/>
    </style:style>
    <style:style style:name="P1" style:family="paragraph" style:parent-style-name="Table_20_Contents">
      <style:text-properties fo:color="#127622" loext:opacity="100%" style:font-name="Liberation Sans" officeooo:paragraph-rsid="0008d073"/>
    </style:style>
    <style:style style:name="P2" style:family="paragraph" style:parent-style-name="Table_20_Contents">
      <style:text-properties style:font-name="Liberation Sans" officeooo:paragraph-rsid="0008d073"/>
    </style:style>
    <style:style style:name="P3" style:family="paragraph" style:parent-style-name="Standard" style:list-style-name="L1">
      <style:text-properties style:font-name="Liberation Sans" officeooo:rsid="0008d073" officeooo:paragraph-rsid="0008d073"/>
    </style:style>
    <style:style style:name="P4" style:family="paragraph" style:parent-style-name="Standard">
      <style:text-properties style:font-name="Liberation Sans" officeooo:rsid="0008d073" officeooo:paragraph-rsid="0008d073"/>
    </style:style>
    <style:style style:name="P5" style:family="paragraph" style:parent-style-name="Standard">
      <style:text-properties style:font-name="Liberation Sans" officeooo:rsid="000bb10b" officeooo:paragraph-rsid="000bb10b"/>
    </style:style>
    <style:style style:name="P6" style:family="paragraph" style:parent-style-name="Table_20_Contents">
      <style:text-properties fo:color="#127622" loext:opacity="100%" style:font-name="Liberation Sans" officeooo:paragraph-rsid="000bc8bc"/>
    </style:style>
    <style:style style:name="P7" style:family="paragraph" style:parent-style-name="Table_20_Contents">
      <style:text-properties style:font-name="Liberation Sans" officeooo:paragraph-rsid="00ad821e"/>
    </style:style>
    <style:style style:name="P8" style:family="paragraph" style:parent-style-name="Standard" style:list-style-name="L2">
      <style:text-properties style:font-name="Liberation Sans" officeooo:rsid="000d3211" officeooo:paragraph-rsid="000d3211"/>
    </style:style>
    <style:style style:name="P9" style:family="paragraph" style:parent-style-name="Standard" style:list-style-name="L2">
      <style:text-properties style:font-name="Liberation Sans" officeooo:rsid="000d3211" officeooo:paragraph-rsid="00102e73"/>
    </style:style>
    <style:style style:name="P10" style:family="paragraph" style:parent-style-name="Standard">
      <style:text-properties style:font-name="Liberation Sans" officeooo:rsid="000d3211" officeooo:paragraph-rsid="00102e73"/>
    </style:style>
    <style:style style:name="P11" style:family="paragraph" style:parent-style-name="Standard">
      <style:text-properties style:font-name="Liberation Sans" officeooo:rsid="000d3211" officeooo:paragraph-rsid="006a757b"/>
    </style:style>
    <style:style style:name="P12" style:family="paragraph" style:parent-style-name="Standard">
      <style:text-properties style:font-name="Liberation Sans" officeooo:rsid="000d3211" officeooo:paragraph-rsid="008b43c3"/>
    </style:style>
    <style:style style:name="P13" style:family="paragraph" style:parent-style-name="Standard">
      <style:text-properties style:font-name="Liberation Sans" officeooo:rsid="0010a47e" officeooo:paragraph-rsid="0010a47e"/>
    </style:style>
    <style:style style:name="P14" style:family="paragraph" style:parent-style-name="Table_20_Contents">
      <style:paragraph-properties fo:text-align="center" style:justify-single-word="false"/>
      <style:text-properties style:font-name="Liberation Sans" officeooo:rsid="0010a47e" officeooo:paragraph-rsid="0010a47e"/>
    </style:style>
    <style:style style:name="P15" style:family="paragraph" style:parent-style-name="Table_20_Contents">
      <style:paragraph-properties fo:text-align="center" style:justify-single-word="false"/>
      <style:text-properties style:font-name="Liberation Sans" officeooo:rsid="00172cd4" officeooo:paragraph-rsid="00172cd4"/>
    </style:style>
    <style:style style:name="P16" style:family="paragraph" style:parent-style-name="Standard">
      <style:text-properties style:font-name="Liberation Sans" officeooo:rsid="00153fab" officeooo:paragraph-rsid="00727b00"/>
    </style:style>
    <style:style style:name="P17" style:family="paragraph" style:parent-style-name="Standard">
      <style:text-properties style:font-name="Liberation Sans" officeooo:rsid="00153fab" officeooo:paragraph-rsid="0031eb15"/>
    </style:style>
    <style:style style:name="P18" style:family="paragraph" style:parent-style-name="Standard">
      <style:text-properties style:font-name="Liberation Sans" officeooo:rsid="00153fab" officeooo:paragraph-rsid="00153fab"/>
    </style:style>
    <style:style style:name="P19" style:family="paragraph" style:parent-style-name="Standard">
      <style:text-properties style:font-name="Liberation Sans" officeooo:rsid="0038ad0a" officeooo:paragraph-rsid="0038ad0a"/>
    </style:style>
    <style:style style:name="P20" style:family="paragraph" style:parent-style-name="Table_20_Contents">
      <style:paragraph-properties fo:text-align="center" style:justify-single-word="false"/>
      <style:text-properties style:font-name="Liberation Sans" officeooo:rsid="0010a47e" officeooo:paragraph-rsid="001ed73a"/>
    </style:style>
    <style:style style:name="P21" style:family="paragraph" style:parent-style-name="Text_20_body">
      <style:text-properties style:font-name="Liberation Sans" officeooo:rsid="00153fab" officeooo:paragraph-rsid="00153fab"/>
    </style:style>
    <style:style style:name="P22" style:family="paragraph" style:parent-style-name="Text_20_body">
      <style:text-properties fo:font-variant="normal" fo:text-transform="none" fo:color="#000000" loext:opacity="100%" style:font-name="LiberationSans-Regular" fo:font-size="12pt" fo:letter-spacing="normal" fo:font-style="normal" fo:font-weight="normal" officeooo:paragraph-rsid="00153fab"/>
    </style:style>
    <style:style style:name="P23" style:family="paragraph" style:parent-style-name="Text_20_body">
      <style:paragraph-properties fo:margin-left="0in" fo:margin-right="0in" fo:text-align="left" style:justify-single-word="false" fo:orphans="2" fo:widows="2" fo:text-indent="0in" style:auto-text-indent="false"/>
      <style:text-properties fo:font-variant="normal" fo:text-transform="none" fo:color="#000000" loext:opacity="100%" style:font-name="LiberationSans-Regular" fo:font-size="12pt" fo:letter-spacing="normal" fo:font-style="normal" fo:font-weight="normal"/>
    </style:style>
    <style:style style:name="P24" style:family="paragraph" style:parent-style-name="Text_20_body">
      <style:paragraph-properties fo:margin-left="0in" fo:margin-right="0in" fo:text-align="left" style:justify-single-word="false" fo:orphans="2" fo:widows="2" fo:text-indent="0in" style:auto-text-indent="false"/>
      <style:text-properties style:font-name="LiberationSans-Regular"/>
    </style:style>
    <style:style style:name="P25" style:family="paragraph" style:parent-style-name="Table_20_Contents">
      <style:paragraph-properties fo:text-align="center" style:justify-single-word="false"/>
      <style:text-properties style:font-name="Liberation Sans" officeooo:rsid="0010a47e" officeooo:paragraph-rsid="002478f0"/>
    </style:style>
    <style:style style:name="P26" style:family="paragraph" style:parent-style-name="Text_20_body">
      <style:text-properties style:font-name="Liberation Sans" officeooo:rsid="00153fab" officeooo:paragraph-rsid="002478f0"/>
    </style:style>
    <style:style style:name="P27" style:family="paragraph" style:parent-style-name="Text_20_body">
      <style:text-properties fo:font-variant="normal" fo:text-transform="none" fo:color="#000000" loext:opacity="100%" style:font-name="LiberationSans-Regular" fo:font-size="12pt" fo:letter-spacing="normal" fo:font-style="normal" fo:font-weight="normal" officeooo:paragraph-rsid="002478f0"/>
    </style:style>
    <style:style style:name="P28" style:family="paragraph" style:parent-style-name="Text_20_body">
      <style:text-properties style:font-name="Liberation Sans" officeooo:paragraph-rsid="002478f0"/>
    </style:style>
    <style:style style:name="P29" style:family="paragraph" style:parent-style-name="Table_20_Contents">
      <style:paragraph-properties fo:text-align="center" style:justify-single-word="false"/>
      <style:text-properties style:font-name="Liberation Sans" officeooo:rsid="002d850a" officeooo:paragraph-rsid="002e87b6"/>
    </style:style>
    <style:style style:name="P30" style:family="paragraph" style:parent-style-name="Table_20_Contents">
      <style:paragraph-properties fo:text-align="center" style:justify-single-word="false"/>
      <style:text-properties style:font-name="Liberation Sans" fo:font-size="10pt" officeooo:rsid="002d850a" officeooo:paragraph-rsid="002e87b6" style:font-size-asian="10pt" style:font-size-complex="10pt"/>
    </style:style>
    <style:style style:name="P31" style:family="paragraph" style:parent-style-name="Table_20_Contents">
      <style:paragraph-properties fo:text-align="center" style:justify-single-word="false"/>
      <style:text-properties style:font-name="Liberation Sans" officeooo:rsid="002969f7" officeooo:paragraph-rsid="002969f7"/>
    </style:style>
    <style:style style:name="P32" style:family="paragraph" style:parent-style-name="Table_20_Contents">
      <style:text-properties style:font-name="Liberation Sans" fo:font-size="10pt" officeooo:paragraph-rsid="004b2f2f" style:font-size-asian="10pt" style:font-size-complex="10pt"/>
    </style:style>
    <style:style style:name="P33" style:family="paragraph" style:parent-style-name="Table_20_Contents">
      <style:paragraph-properties fo:text-align="left" style:justify-single-word="false"/>
      <style:text-properties fo:font-variant="normal" fo:text-transform="none" fo:color="#000000" loext:opacity="100%" style:font-name="Liberation Sans" fo:font-size="10pt" fo:letter-spacing="normal" fo:font-style="normal" fo:font-weight="normal" officeooo:paragraph-rsid="004c7ef7" style:font-size-asian="10pt" style:font-size-complex="10pt"/>
    </style:style>
    <style:style style:name="P34" style:family="paragraph" style:parent-style-name="Table_20_Contents">
      <style:paragraph-properties fo:text-align="left" style:justify-single-word="false"/>
      <style:text-properties style:font-name="Liberation Sans" fo:font-size="10pt" style:font-size-asian="10pt" style:font-size-complex="10pt"/>
    </style:style>
    <style:style style:name="P35" style:family="paragraph" style:parent-style-name="Standard">
      <style:paragraph-properties fo:margin-left="0in" fo:margin-right="0in" fo:text-align="left" style:justify-single-word="false" fo:orphans="2" fo:widows="2" fo:text-indent="0in" style:auto-text-indent="false"/>
      <style:text-properties style:font-name="Liberation Sans" officeooo:paragraph-rsid="002478f0"/>
    </style:style>
    <style:style style:name="T1" style:family="text">
      <style:text-properties officeooo:rsid="0009a0f3"/>
    </style:style>
    <style:style style:name="T2" style:family="text">
      <style:text-properties fo:color="#127622" loext:opacity="100%" officeooo:rsid="0009a0f3"/>
    </style:style>
    <style:style style:name="T3" style:family="text">
      <style:text-properties officeooo:rsid="00a3cbbb"/>
    </style:style>
    <style:style style:name="T4" style:family="text">
      <style:text-properties officeooo:rsid="003d089f"/>
    </style:style>
    <style:style style:name="T5" style:family="text">
      <style:text-properties officeooo:rsid="00501bb0"/>
    </style:style>
    <style:style style:name="T6" style:family="text">
      <style:text-properties officeooo:rsid="0052089d"/>
    </style:style>
    <style:style style:name="T7" style:family="text">
      <style:text-properties officeooo:rsid="00504a8e"/>
    </style:style>
    <style:style style:name="T8" style:family="text">
      <style:text-properties style:text-position="super 58%"/>
    </style:style>
    <style:style style:name="T9" style:family="text">
      <style:text-properties officeooo:rsid="00a4910c"/>
    </style:style>
    <style:style style:name="T10" style:family="text">
      <style:text-properties officeooo:rsid="003d1e1d"/>
    </style:style>
    <style:style style:name="T11" style:family="text">
      <style:text-properties officeooo:rsid="0013f742"/>
    </style:style>
    <style:style style:name="T12" style:family="text">
      <style:text-properties officeooo:rsid="000ed41e"/>
    </style:style>
    <style:style style:name="T13" style:family="text">
      <style:text-properties officeooo:rsid="0040b277"/>
    </style:style>
    <style:style style:name="T14" style:family="text">
      <style:text-properties officeooo:rsid="00667605"/>
    </style:style>
    <style:style style:name="T15" style:family="text">
      <style:text-properties officeooo:rsid="0059ef7a"/>
    </style:style>
    <style:style style:name="T16" style:family="text">
      <style:text-properties officeooo:rsid="006a234e"/>
    </style:style>
    <style:style style:name="T17" style:family="text">
      <style:text-properties officeooo:rsid="006a757b"/>
    </style:style>
    <style:style style:name="T18" style:family="text">
      <style:text-properties fo:font-style="italic" officeooo:rsid="006a757b" style:font-style-asian="italic" style:font-style-complex="italic"/>
    </style:style>
    <style:style style:name="T19" style:family="text">
      <style:text-properties officeooo:rsid="00ada30c"/>
    </style:style>
    <style:style style:name="T20" style:family="text">
      <style:text-properties officeooo:rsid="00a59f51"/>
    </style:style>
    <style:style style:name="T21" style:family="text">
      <style:text-properties officeooo:rsid="006ff0b6"/>
    </style:style>
    <style:style style:name="T22" style:family="text">
      <style:text-properties officeooo:rsid="006bd263"/>
    </style:style>
    <style:style style:name="T23" style:family="text">
      <style:text-properties officeooo:rsid="008ae3f4"/>
    </style:style>
    <style:style style:name="T24" style:family="text">
      <style:text-properties officeooo:rsid="00915b59"/>
    </style:style>
    <style:style style:name="T25" style:family="text">
      <style:text-properties officeooo:rsid="009abecf"/>
    </style:style>
    <style:style style:name="T26" style:family="text">
      <style:text-properties officeooo:rsid="0091f9a0"/>
    </style:style>
    <style:style style:name="T27" style:family="text">
      <style:text-properties officeooo:rsid="006dcd3a"/>
    </style:style>
    <style:style style:name="T28" style:family="text">
      <style:text-properties fo:color="#127622" loext:opacity="100%" officeooo:rsid="006dcd3a"/>
    </style:style>
    <style:style style:name="T29" style:family="text">
      <style:text-properties officeooo:rsid="00b0c7d8"/>
    </style:style>
    <style:style style:name="T30" style:family="text">
      <style:text-properties officeooo:rsid="006f191a"/>
    </style:style>
    <style:style style:name="T31" style:family="text">
      <style:text-properties fo:color="#127622" loext:opacity="100%" officeooo:rsid="006f191a"/>
    </style:style>
    <style:style style:name="T32" style:family="text">
      <style:text-properties officeooo:rsid="0088e774"/>
    </style:style>
    <style:style style:name="T33" style:family="text">
      <style:text-properties officeooo:rsid="008ebf79"/>
    </style:style>
    <style:style style:name="T34" style:family="text">
      <style:text-properties officeooo:rsid="00a6e2e6"/>
    </style:style>
    <style:style style:name="T35" style:family="text">
      <style:text-properties officeooo:rsid="008a9b4d"/>
    </style:style>
    <style:style style:name="T36" style:family="text">
      <style:text-properties officeooo:rsid="008c8f72"/>
    </style:style>
    <style:style style:name="T37" style:family="text">
      <style:text-properties officeooo:rsid="008e2ed1"/>
    </style:style>
    <style:style style:name="T38" style:family="text">
      <style:text-properties officeooo:rsid="008fce81"/>
    </style:style>
    <style:style style:name="T39" style:family="text">
      <style:text-properties fo:color="#127622" loext:opacity="100%" officeooo:rsid="00aedddb"/>
    </style:style>
    <style:style style:name="T40" style:family="text">
      <style:text-properties officeooo:rsid="00aedddb"/>
    </style:style>
    <style:style style:name="T41" style:family="text">
      <style:text-properties fo:color="#127622" loext:opacity="100%" officeooo:rsid="008e2ed1"/>
    </style:style>
    <style:style style:name="T42" style:family="text">
      <style:text-properties officeooo:rsid="001188ea"/>
    </style:style>
    <style:style style:name="T43" style:family="text">
      <style:text-properties officeooo:rsid="00131293"/>
    </style:style>
    <style:style style:name="T44" style:family="text">
      <style:text-properties officeooo:rsid="00a89ed3"/>
    </style:style>
    <style:style style:name="T45" style:family="text">
      <style:text-properties officeooo:rsid="005bcec6"/>
    </style:style>
    <style:style style:name="T46" style:family="text">
      <style:text-properties officeooo:rsid="0092d533"/>
    </style:style>
    <style:style style:name="T47" style:family="text">
      <style:text-properties officeooo:rsid="009c5b91"/>
    </style:style>
    <style:style style:name="T48" style:family="text">
      <style:text-properties officeooo:rsid="0071801f"/>
    </style:style>
    <style:style style:name="T49" style:family="text">
      <style:text-properties officeooo:rsid="00727b00"/>
    </style:style>
    <style:style style:name="T50" style:family="text">
      <style:text-properties fo:color="#127622" loext:opacity="100%" officeooo:rsid="00727b00"/>
    </style:style>
    <style:style style:name="T51" style:family="text">
      <style:text-properties officeooo:rsid="00816285"/>
    </style:style>
    <style:style style:name="T52" style:family="text">
      <style:text-properties officeooo:rsid="001aebeb"/>
    </style:style>
    <style:style style:name="T53" style:family="text">
      <style:text-properties officeooo:rsid="005d1ac1"/>
    </style:style>
    <style:style style:name="T54" style:family="text">
      <style:text-properties officeooo:rsid="00750fd5"/>
    </style:style>
    <style:style style:name="T55" style:family="text">
      <style:text-properties officeooo:rsid="001d96c4"/>
    </style:style>
    <style:style style:name="T56" style:family="text">
      <style:text-properties officeooo:rsid="001c6c7b"/>
    </style:style>
    <style:style style:name="T57" style:family="text">
      <style:text-properties officeooo:rsid="001ed73a"/>
    </style:style>
    <style:style style:name="T58" style:family="text">
      <style:text-properties officeooo:rsid="00200b6e"/>
    </style:style>
    <style:style style:name="T59" style:family="text">
      <style:text-properties officeooo:rsid="001f9a4b"/>
    </style:style>
    <style:style style:name="T60" style:family="text">
      <style:text-properties fo:color="#ff0000" loext:opacity="100%" officeooo:rsid="00958eae"/>
    </style:style>
    <style:style style:name="T61" style:family="text">
      <style:text-properties officeooo:rsid="00958eae"/>
    </style:style>
    <style:style style:name="T62" style:family="text">
      <style:text-properties officeooo:rsid="0021f4cf"/>
    </style:style>
    <style:style style:name="T63" style:family="text">
      <style:text-properties officeooo:rsid="002b3641"/>
    </style:style>
    <style:style style:name="T64" style:family="text">
      <style:text-properties officeooo:rsid="00841143"/>
    </style:style>
    <style:style style:name="T65" style:family="text">
      <style:text-properties officeooo:rsid="002b4399"/>
    </style:style>
    <style:style style:name="T66" style:family="text">
      <style:text-properties officeooo:rsid="00334e8b"/>
    </style:style>
    <style:style style:name="T67" style:family="text">
      <style:text-properties fo:font-weight="bold" officeooo:rsid="002b4399" style:font-weight-asian="bold" style:font-weight-complex="bold"/>
    </style:style>
    <style:style style:name="T68" style:family="text">
      <style:text-properties officeooo:rsid="005dd00b"/>
    </style:style>
    <style:style style:name="T69" style:family="text">
      <style:text-properties officeooo:rsid="0031eff9"/>
    </style:style>
    <style:style style:name="T70" style:family="text">
      <style:text-properties officeooo:rsid="00a91fee"/>
    </style:style>
    <style:style style:name="T71" style:family="text">
      <style:text-properties officeooo:rsid="005f6d1b"/>
    </style:style>
    <style:style style:name="T72" style:family="text">
      <style:text-properties officeooo:rsid="00394d40"/>
    </style:style>
    <style:style style:name="T73" style:family="text">
      <style:text-properties officeooo:rsid="004dcbbc"/>
    </style:style>
    <style:style style:name="T74" style:family="text">
      <style:text-properties officeooo:rsid="00475224"/>
    </style:style>
    <style:style style:name="T75" style:family="text">
      <style:text-properties officeooo:rsid="0045defb"/>
    </style:style>
    <style:style style:name="T76" style:family="text">
      <style:text-properties officeooo:rsid="003a7604"/>
    </style:style>
    <style:style style:name="T77" style:family="text">
      <style:text-properties officeooo:rsid="004f53c5"/>
    </style:style>
    <style:style style:name="T78" style:family="text">
      <style:text-properties officeooo:rsid="004f6973"/>
    </style:style>
    <style:style style:name="T79" style:family="text">
      <style:text-properties officeooo:rsid="00ab1fbd"/>
    </style:style>
    <style:style style:name="T80" style:family="text">
      <style:text-properties officeooo:rsid="00a9e31c"/>
    </style:style>
    <style:style style:name="T81" style:family="text">
      <style:text-properties fo:color="#127622" loext:opacity="100%" officeooo:rsid="003a7604"/>
    </style:style>
    <style:style style:name="T82" style:family="text">
      <style:text-properties style:use-window-font-color="true" loext:opacity="0%" officeooo:rsid="003a7604"/>
    </style:style>
    <style:style style:name="T83" style:family="text">
      <style:text-properties style:use-window-font-color="true" loext:opacity="0%" fo:font-weight="normal" officeooo:rsid="008806cb" style:font-weight-asian="normal" style:font-weight-complex="normal"/>
    </style:style>
    <style:style style:name="T84" style:family="text">
      <style:text-properties officeooo:rsid="00973578"/>
    </style:style>
    <style:style style:name="T85" style:family="text">
      <style:text-properties fo:font-style="italic" officeooo:rsid="00973578" style:font-style-asian="italic" style:font-style-complex="italic"/>
    </style:style>
    <style:style style:name="T86" style:family="text">
      <style:text-properties officeooo:rsid="00965e28"/>
    </style:style>
    <style:style style:name="T87" style:family="text">
      <style:text-properties officeooo:rsid="00172cd4"/>
    </style:style>
    <style:style style:name="T88" style:family="text">
      <style:text-properties fo:color="#127630" loext:opacity="100%"/>
    </style:style>
    <style:style style:name="T89" style:family="text">
      <style:text-properties fo:background-color="#f7f305" loext:char-shading-value="0"/>
    </style:style>
    <style:style style:name="T90" style:family="text">
      <style:text-properties fo:font-variant="normal" fo:text-transform="none" fo:color="#127630" loext:opacity="100%" fo:font-size="12pt" fo:letter-spacing="normal" fo:font-style="normal" fo:font-weight="normal"/>
    </style:style>
    <style:style style:name="T91" style:family="text">
      <style:text-properties fo:font-variant="normal" fo:text-transform="none" fo:color="#000000" loext:opacity="100%" fo:font-size="12pt" fo:letter-spacing="normal" fo:font-style="normal" fo:font-weight="normal"/>
    </style:style>
    <style:style style:name="T92" style:family="text">
      <style:text-properties fo:font-variant="normal" fo:text-transform="none" fo:color="#000000" loext:opacity="100%" fo:font-size="12pt" fo:letter-spacing="normal" fo:font-style="normal" fo:font-weight="normal" fo:background-color="#f7f305" loext:char-shading-value="0"/>
    </style:style>
    <style:style style:name="T93" style:family="text">
      <style:text-properties officeooo:rsid="002478f0"/>
    </style:style>
    <style:style style:name="T94" style:family="text">
      <style:text-properties officeooo:rsid="002e87b6"/>
    </style:style>
    <style:style style:name="T95" style:family="text">
      <style:text-properties officeooo:rsid="00495917"/>
    </style:style>
    <style:style style:name="T96" style:family="text">
      <style:text-properties fo:font-variant="normal" fo:text-transform="none" fo:color="#000000" loext:opacity="100%" fo:letter-spacing="normal" fo:font-style="normal" fo:font-weight="normal"/>
    </style:style>
    <style:style style:name="T97" style:family="text">
      <style:text-properties fo:font-variant="normal" fo:text-transform="none" fo:color="#000000" loext:opacity="100%" fo:letter-spacing="normal" fo:font-style="normal" fo:font-weight="normal" fo:background-color="#ffff00"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Genesis 6:14</text:p>
            <text:p text:style-name="P2">¶ Make thee an ark of gopher wood; rooms shalt thou make in the ark, and shalt pitch it within and without with pitch.</text:p>
          </table:table-cell>
        </table:table-row>
      </table:table>
      <text:list text:style-name="L1">
        <text:list-item>
          <text:p text:style-name="P3">After God announces His judgment <text:span text:style-name="T1">o</text:span>n the earth to Noah <text:span text:style-name="T1">(v</text:span><text:span text:style-name="T2">13</text:span><text:span text:style-name="T1">)</text:span> He begins instructing Noah <text:span text:style-name="T3">on </text:span>how to construct the ark. T<text:span text:style-name="T4">ake special note that t</text:span>he instructions begin with an overview of the whole project <text:span text:style-name="T1">(v</text:span><text:span text:style-name="T2">14</text:span><text:span text:style-name="T1">).</text:span></text:p>
        </text:list-item>
      </text:list>
      <text:p text:style-name="P4"/>
      <text:p text:style-name="P5"><text:span text:style-name="T5">The literal aspect of the verse </text:span><text:span text:style-name="T6">is straightforward</text:span>. <text:span text:style-name="T5">The boat is to be made of wood so it is b</text:span><text:span text:style-name="T7">u</text:span><text:span text:style-name="T5">oyant </text:span><text:span text:style-name="T7">on water </text:span><text:span text:style-name="T5">and sealed on the inside and the outside to make it waterproof.</text:span></text:p>
      <text:p text:style-name="P5"/>
      <table:table table:name="Table2" table:style-name="Table2">
        <table:table-column table:style-name="Table2.A"/>
        <table:table-row>
          <table:table-cell table:style-name="Table2.A1" office:value-type="string">
            <text:p text:style-name="P6">Genesis 6:14</text:p>
            <text:p text:style-name="P7">¶ Make <text:span text:style-name="T8">H6213[(H8798)]</text:span> thee an ark <text:span text:style-name="T8">H8392</text:span> of gopher <text:span text:style-name="T8">H1613</text:span> wood <text:span text:style-name="T8">H6086</text:span>; rooms <text:span text:style-name="T8">H7064</text:span> shalt thou make <text:span text:style-name="T8">H6213[(H8799)]</text:span> in <text:span text:style-name="T8">H854</text:span> the ark <text:span text:style-name="T8">H8392</text:span>, and shalt pitch <text:span text:style-name="T8">H3722[(H8804)]</text:span> it within <text:span text:style-name="T8">H1004</text:span> and without <text:span text:style-name="T8">H2351</text:span> with pitch <text:span text:style-name="T8">H3724</text:span>.</text:p>
          </table:table-cell>
        </table:table-row>
      </table:table>
      <text:list text:style-name="L2">
        <text:list-item>
          <text:p text:style-name="P8">Notice anything unusual about the Strong’s numbers for this verse?</text:p>
        </text:list-item>
        <text:list-item>
          <text:p text:style-name="P9">The English word “pitch” appears twice <text:span text:style-name="T9">in this verse</text:span>; however, the <text:span text:style-name="T10">Strong’s number</text:span> for each instance of “pitch” is not exactly the same. <text:span text:style-name="T11">That’s because the Hebrew words rendered </text:span><text:span text:style-name="T10">to</text:span><text:span text:style-name="T11"> English as “pitch” are not exactly the same.</text:span></text:p>
        </text:list-item>
      </text:list>
      <text:p text:style-name="P10"/>
      <text:p text:style-name="P11"><text:span text:style-name="T12">At this point y</text:span>ou may or may not be tempted to grab a Strong’s concordance and look up each Strong’s number <text:span text:style-name="T12">definition </text:span>to find out why these two <text:span text:style-name="T13">are </text:span>differen<text:span text:style-name="T14">t</text:span>. <text:span text:style-name="T11">Let’s forego that today </text:span><text:span text:style-name="T15">and </text:span><text:span text:style-name="T16">try something you may not be familiar with.</text:span></text:p>
      <text:p text:style-name="P11"/>
      <text:p text:style-name="P12"><text:span text:style-name="T17">Have you ever wondered </text:span><text:span text:style-name="T18">how</text:span><text:span text:style-name="T17"> James Strong or Noah Webster acquired their definitions? Have you ever wondered if </text:span><text:span text:style-name="T19">those</text:span><text:span text:style-name="T20"> processes are</text:span><text:span text:style-name="T17"> reproducible? If their definitions are based on the Bible and the Bible never changes it stands to reason that th</text:span><text:span text:style-name="T19">ose</text:span><text:span text:style-name="T17"> processes to acquire those definitions </text:span><text:span text:style-name="T21">should be</text:span><text:span text:style-name="T17"> reproducible</text:span><text:span text:style-name="T22">. </text:span><text:span text:style-name="T23">Additionally, </text:span><text:span text:style-name="T24">we should also be able to</text:span><text:span text:style-name="T23"> unequivocally </text:span><text:span text:style-name="T25">prove</text:span><text:span text:style-name="T23"> </text:span><text:span text:style-name="T26">the results</text:span><text:span text:style-name="T23">.</text:span><text:span text:style-name="T22"> </text:span><text:span text:style-name="T27">By working in reverse order we can thereby prove the work (</text:span><text:span text:style-name="T28">1 Thess 5:21a</text:span><text:span text:style-name="T27">) and also discern </text:span><text:span text:style-name="T29">whose work it really is </text:span><text:span text:style-name="T30">(</text:span><text:span text:style-name="T31">Heb 4:12f</text:span><text:span text:style-name="T30">)</text:span><text:span text:style-name="T27">. </text:span><text:span text:style-name="T32">Gods will is accomplished </text:span><text:span text:style-name="T33">re</text:span><text:span text:style-name="T32">gardless of men or circumstances and His work can be </text:span><text:span text:style-name="T34">confirmed</text:span><text:span text:style-name="T32"> </text:span><text:span text:style-name="T35">and </text:span><text:span text:style-name="T34">recognized</text:span><text:span text:style-name="T35"> </text:span><text:span text:style-name="T36">using His own word </text:span><text:span text:style-name="T37">and His </text:span><text:span text:style-name="T38">S</text:span><text:span text:style-name="T37">pirit (</text:span><text:span text:style-name="T39">John 14:26</text:span><text:span text:style-name="T40">, </text:span><text:span text:style-name="T41">John 16:13a-d</text:span><text:span text:style-name="T37">).</text:span></text:p>
      <text:p text:style-name="P13"/>
      <text:p text:style-name="P13">We’ll begin <text:span text:style-name="T42">by</text:span> gathering our Strong’s numbers <text:span text:style-name="T43">which </text:span><text:span text:style-name="T44">throughout this exercise</text:span><text:span text:style-name="T45"> </text:span><text:span text:style-name="T43">are </text:span>simpl<text:span text:style-name="T43">y </text:span>a coded representation <text:span text:style-name="T45">of </text:span><text:span text:style-name="T46">words that appear in God’s word</text:span><text:span text:style-name="T45">.</text:span></text:p>
      <text:p text:style-name="P13"/>
      <table:table table:name="Table3" table:style-name="Table3">
        <table:table-column table:style-name="Table3.A"/>
        <table:table-column table:style-name="Table3.B"/>
        <table:table-row>
          <table:table-cell table:style-name="Table3.A1" office:value-type="string">
            <text:p text:style-name="P14">H3722</text:p>
          </table:table-cell>
          <table:table-cell table:style-name="Table3.B1" office:value-type="string">
            <text:p text:style-name="P14">H3724</text:p>
          </table:table-cell>
        </table:table-row>
        <table:table-row>
          <table:table-cell table:style-name="Table3.A2" office:value-type="string">
            <text:p text:style-name="P15">Appears 102 times in 94 verses.</text:p>
          </table:table-cell>
          <table:table-cell table:style-name="Table3.B2" office:value-type="string">
            <text:p text:style-name="P15">Appears 17 times in 17 verses.</text:p>
          </table:table-cell>
        </table:table-row>
      </table:table>
      <text:p text:style-name="P10"/>
      <text:p text:style-name="P16">And next, we will look at every Biblical <text:span text:style-name="T47">English </text:span>usage of those exact same Hebrew words which correspond to these Strong’s numbers <text:span text:style-name="T48">(for this exercise the verse being looked</text:span><text:span text:style-name="T49"> </text:span><text:span text:style-name="T48">at, </text:span><text:span text:style-name="T50">Genesis 6:14</text:span><text:span text:style-name="T49">, </text:span><text:span text:style-name="T48">has been excluded </text:span><text:span text:style-name="T51">below</text:span><text:span text:style-name="T48">).</text:span></text:p>
      <text:p text:style-name="P17"/>
      <text:p text:style-name="P17"><text:span text:style-name="T52">Below you will find </text:span><text:span text:style-name="T53">separate </text:span><text:span text:style-name="T52">lists of verses for each </text:span><text:span text:style-name="T54">and every </text:span><text:span text:style-name="T52">appearance of those Strong’s numbers. The words highlighted are the </text:span><text:span text:style-name="T55">exact </text:span><text:span text:style-name="T52">English </text:span><text:span text:style-name="T56">words rendered from the Hebrew words that we are looking at.</text:span></text:p>
      <text:p text:style-name="P17"/>
      <text:p text:style-name="P17"><text:span text:style-name="T57">Following those lists will be a table with an outline of Biblical usage for </text:span><text:span text:style-name="T58">each </text:span><text:span text:style-name="T59">Strong’s number</text:span><text:span text:style-name="T57">. </text:span><text:span text:style-name="T60">WARNING</text:span><text:span text:style-name="T61">: </text:span><text:span text:style-name="T62">The summaries are </text:span><text:span text:style-name="T63">of </text:span><text:span text:style-name="T64">little to no</text:span><text:span text:style-name="T63"> </text:span><text:span text:style-name="T62">use</text:span><text:span text:style-name="T63"> outside of their context </text:span><text:span text:style-name="T65">and so each </text:span><text:span text:style-name="T66">usage</text:span><text:span text:style-name="T65"> </text:span><text:span text:style-name="T67">must</text:span><text:span text:style-name="T65"> be </text:span><text:span text:style-name="T68">understood</text:span><text:span text:style-name="T65"> in </text:span><text:span text:style-name="T69">its </text:span><text:span text:style-name="T65">context </text:span><text:span text:style-name="T67">first</text:span><text:span text:style-name="T65">.</text:span></text:p>
      <text:p text:style-name="P18"/>
      <text:p text:style-name="P19">As you <text:span text:style-name="T70">study</text:span> the <text:span text:style-name="T70">verses</text:span> <text:span text:style-name="T71">below</text:span>, keep a mental note of <text:span text:style-name="T72">the </text:span><text:span text:style-name="T73">ideas</text:span><text:span text:style-name="T74"> </text:span><text:span text:style-name="T75">that </text:span><text:span text:style-name="T74">are</text:span><text:span text:style-name="T75"> given to us</text:span><text:span text:style-name="T72">. </text:span><text:span text:style-name="T76">When you are done reviewing both, </text:span><text:span text:style-name="T77">go back to the beginning </text:span><text:span text:style-name="T78">and </text:span><text:span text:style-name="T76">apply </text:span><text:span text:style-name="T79">what you learned</text:span><text:span text:style-name="T76"> to </text:span><text:span text:style-name="T80">their respective words in</text:span><text:span text:style-name="T76"> </text:span><text:span text:style-name="T81">Genesis 6:14</text:span><text:span text:style-name="T82"> </text:span><text:span text:style-name="T83">and its context</text:span><text:span text:style-name="T76">. </text:span><text:span text:style-name="T84">The connection to an overarching Biblical </text:span><text:span text:style-name="T85">figure</text:span><text:span text:style-name="T84"> that becomes </text:span><text:span text:style-name="T86">self-evident may surprise you.</text:span></text:p>
      <table:table table:name="Table4" table:style-name="Table4">
        <table:table-column table:style-name="Table4.A"/>
        <table:table-row>
          <table:table-cell table:style-name="Table4.A1" office:value-type="string">
            <text:p text:style-name="P20">H3722 <text:span text:style-name="T57">(a</text:span><text:span text:style-name="T87">ppears 102 times in 94 verses</text:span><text:span text:style-name="T57">)</text:span></text:p>
          </table:table-cell>
        </table:table-row>
      </table:table>
      <text:p text:style-name="P21"/>
      <text:p text:style-name="P22"><text:span text:style-name="T88">Gen 32:20</text:span> And say ye moreover, Behold, thy servant Jacob is behind us. For he said<text:span text:style-name="T89">, I will appease</text:span> him with the present that goeth before me, and afterward I will see his face; peradventure he will accept of me.</text:p>
      <text:p text:style-name="P23"><text:span text:style-name="T88">Exo 29:33</text:span> And they shall eat <text:span text:style-name="T89">those things wherewith the atonement was made</text:span>, to consecrate and to sanctify them: but a stranger shall not eat thereof, because they are holy.</text:p>
      <text:p text:style-name="P23"><text:span text:style-name="T88">Exo 29:36</text:span> And thou shalt offer every day a bullock for a sin offering for atonement: and thou shalt cleanse the altar<text:span text:style-name="T89">, when thou hast made an atonement</text:span> for it, and thou shalt anoint it, to sanctify it.</text:p>
      <text:p text:style-name="P23"><text:span text:style-name="T88">Exo 29:37</text:span> Seven days <text:span text:style-name="T89">thou shalt make an atonement</text:span> for the altar, and sanctify it; and it shall be an altar most holy: whatsoever toucheth the altar shall be holy.</text:p>
      <text:p text:style-name="P23"><text:span text:style-name="T88">Exo 30:10</text:span> And Aaron <text:span text:style-name="T89">shall make an atonement</text:span> upon the horns of it once in a year with the blood of the sin offering of atonements: once in the year <text:span text:style-name="T89">shall he make atonement</text:span> upon it throughout your generations: it is most holy unto the LORD.</text:p>
      <text:p text:style-name="P23"><text:span text:style-name="T88">Exo 30:15</text:span> The rich shall not give more, and the poor shall not give less than half a shekel, when they give an offering unto the LORD<text:span text:style-name="T89">, to make an atonement</text:span> for your souls.</text:p>
      <text:p text:style-name="P23"><text:span text:style-name="T88">Exo 30:16</text:span> And thou shalt take the atonement money of the children of Israel, and shalt appoint it for the service of the tabernacle of the congregation; that it may be a memorial unto the children of Israel before the LORD<text:span text:style-name="T89">, to make an atonement</text:span> for your souls.</text:p>
      <text:p text:style-name="P23"><text:span text:style-name="T88">Exo 32:30</text:span> And it came to pass on the morrow, that Moses said unto the people, Ye have sinned a great sin: and now I will go up unto the LORD; peradventure <text:span text:style-name="T89">I shall make an atonement</text:span> for your sin.</text:p>
      <text:p text:style-name="P23"><text:span text:style-name="T88">Lev 1:4</text:span> And he shall put his hand upon the head of the burnt offering; and it shall be accepted <text:span text:style-name="T89">for him to make atonement</text:span> for him.</text:p>
      <text:p text:style-name="P23"><text:span text:style-name="T88">Lev 4:20</text:span> And he shall do with the bullock as he did with the bullock for a sin offering, so shall he do with this: and the priest <text:span text:style-name="T89">shall make an atonement</text:span> for them, and it shall be forgiven them.</text:p>
      <text:p text:style-name="P23"><text:span text:style-name="T88">Lev 4:26</text:span> And he shall burn all his fat upon the altar, as the fat of the sacrifice of peace offerings: and the priest <text:span text:style-name="T89">shall make an atonement</text:span> for him as concerning his sin, and it shall be forgiven him.</text:p>
      <text:p text:style-name="P23"><text:span text:style-name="T88">Lev 4:31</text:span> And he shall take away all the fat thereof, as the fat is taken away from off the sacrifice of peace offerings; and the priest shall burn it upon the altar for a sweet savour unto the LORD; and the priest <text:span text:style-name="T89">shall make an atonement</text:span> for him, and it shall be forgiven him.</text:p>
      <text:p text:style-name="P23"><text:span text:style-name="T88">Lev 4:35</text:span> And he shall take away all the fat thereof, as the fat of the lamb is taken away from the sacrifice of the peace offerings; and the priest shall burn them upon the altar, according to the offerings made by fire unto the LORD: and the priest <text:span text:style-name="T89">shall make an atonement</text:span> for his sin that he hath committed, and it shall be forgiven him.</text:p>
      <text:p text:style-name="P23"><text:soft-page-break/><text:span text:style-name="T88">Lev 5:6</text:span> And he shall bring his trespass offering unto the LORD for his sin which he hath sinned, a female from the flock, a lamb or a kid of the goats, for a sin offering; and the priest <text:span text:style-name="T89">shall make an atonement</text:span> for him concerning his sin.</text:p>
      <text:p text:style-name="P23"><text:span text:style-name="T88">Lev 5:10</text:span> And he shall offer the second for a burnt offering, according to the manner: and the priest <text:span text:style-name="T89">shall make an atonement</text:span> for him for his sin which he hath sinned, and it shall be forgiven him.</text:p>
      <text:p text:style-name="P23"><text:span text:style-name="T88">Lev 5:13</text:span> And the priest <text:span text:style-name="T89">shall make an atonement</text:span> for him as touching his sin that he hath sinned in one of these, and it shall be forgiven him: and the remnant shall be the priest's, as a meat offering.</text:p>
      <text:p text:style-name="P23"><text:span text:style-name="T88">Lev 5:16</text:span> And he shall make amends for the harm that he hath done in the holy thing, and shall add the fifth part thereto, and give it unto the priest: and the priest <text:span text:style-name="T89">shall make an atonement</text:span> for him with the ram of the trespass offering, and it shall be forgiven him.</text:p>
      <text:p text:style-name="P23"><text:span text:style-name="T88">Lev 5:18</text:span> And he shall bring a ram without blemish out of the flock, with thy estimation, for a trespass offering, unto the priest: and the priest <text:span text:style-name="T89">shall make an atonement</text:span> for him concerning his ignorance wherein he erred and wist it not, and it shall be forgiven him.</text:p>
      <text:p text:style-name="P23"><text:span text:style-name="T88">Lev 6:7</text:span> And the priest <text:span text:style-name="T89">shall make an atonement</text:span> for him before the LORD: and it shall be forgiven him for any thing of all that he hath done in trespassing therein.</text:p>
      <text:p text:style-name="P23"><text:span text:style-name="T88">Lev 6:30</text:span> And no sin offering, whereof any of the blood is brought into the tabernacle of the congregation <text:span text:style-name="T89">to reconcile</text:span> withal in the holy place, shall be eaten: it shall be burnt in the fire.</text:p>
      <text:p text:style-name="P23"><text:span text:style-name="T88">Lev 7:7</text:span> As the sin offering is, so is the trespass offering: there is one law for them: the priest <text:span text:style-name="T89">that maketh atonement</text:span> therewith shall have it.</text:p>
      <text:p text:style-name="P23"><text:span text:style-name="T88">Lev 8:15</text:span> And he slew it; and Moses took the blood, and put it upon the horns of the altar round about with his finger, and purified the altar, and poured the blood at the bottom of the altar, and sanctified <text:span text:style-name="T89">it, to make reconciliation</text:span> upon it.</text:p>
      <text:p text:style-name="P23"><text:span text:style-name="T88">Lev 8:34</text:span> As he hath done this day, so the LORD hath commanded to do<text:span text:style-name="T89">, to make an atonement</text:span> for you.</text:p>
      <text:p text:style-name="P23"><text:span text:style-name="T88">Lev 9:7</text:span> And Moses said unto Aaron, Go unto the altar, and offer thy sin offering, and thy burnt offering<text:span text:style-name="T89">, and make an atonement</text:span> for thyself, and for the people: and offer the offering of the people<text:span text:style-name="T89">, and make an atonement</text:span> for them; as the LORD commanded.</text:p>
      <text:p text:style-name="P23"><text:span text:style-name="T88">Lev 10:17</text:span> Wherefore have ye not eaten the sin offering in the holy place, seeing it is most holy, and God hath given it you to bear the iniquity of the congregation<text:span text:style-name="T89">, to make atonement</text:span> for them before the LORD?</text:p>
      <text:p text:style-name="P23"><text:span text:style-name="T88">Lev 12:7</text:span> Who shall offer it before the LORD<text:span text:style-name="T89">, and make an atonement</text:span> for her; and she shall be cleansed from the issue of her blood. This is the law for her that hath born a male or a female.</text:p>
      <text:p text:style-name="P23"><text:span text:style-name="T88">Lev 12:8</text:span> And if she be not able to bring a lamb, then she shall bring two turtles, or two young pigeons; the one for the burnt offering, and the other for a sin offering: and the priest <text:span text:style-name="T89">shall make an atonement</text:span> for her, and she shall be clean.</text:p>
      <text:p text:style-name="P23"><text:soft-page-break/><text:span text:style-name="T88">Lev 14:18</text:span> And the remnant of the oil that is in the priest's hand he shall pour upon the head of him that is to be cleansed: and the priest <text:span text:style-name="T89">shall make an atonement</text:span> for him before the LORD.</text:p>
      <text:p text:style-name="P23"><text:span text:style-name="T88">Lev 14:19</text:span> And the priest shall offer the sin offering<text:span text:style-name="T89">, and make an atonement</text:span> for him that is to be cleansed from his uncleanness; and afterward he shall kill the burnt offering:</text:p>
      <text:p text:style-name="P23"><text:span text:style-name="T88">Lev 14:20</text:span> And the priest shall offer the burnt offering and the meat offering upon the altar: and the priest <text:span text:style-name="T89">shall make an atonement</text:span> for him, and he shall be clean.</text:p>
      <text:p text:style-name="P23"><text:span text:style-name="T88">Lev 14:21</text:span> And if he be poor, and cannot get so much; then he shall take one lamb for a trespass offering to be waved<text:span text:style-name="T89">, to make an atonement</text:span> for him, and one tenth deal of fine flour mingled with oil for a meat offering, and a log of oil;</text:p>
      <text:p text:style-name="P23"><text:span text:style-name="T88">Lev 14:29</text:span> And the rest of the oil that is in the priest's hand he shall put upon the head of him that is to be cleansed<text:span text:style-name="T89">, to make an atonement</text:span> for him before the LORD.</text:p>
      <text:p text:style-name="P23"><text:span text:style-name="T88">Lev 14:31</text:span> Even such as he is able to get, the one for a sin offering, and the other for a burnt offering, with the meat offering: and the priest <text:span text:style-name="T89">shall make an atonement</text:span> for him that is to be cleansed before the LORD.</text:p>
      <text:p text:style-name="P23"><text:span text:style-name="T88">Lev 14:53</text:span> But he shall let go the living bird out of the city into the open fields<text:span text:style-name="T89">, and make an atonement</text:span> for the house: and it shall be clean.</text:p>
      <text:p text:style-name="P23"><text:span text:style-name="T88">Lev 15:15</text:span> And the priest shall offer them, the one for a sin offering, and the other for a burnt offering; and the priest <text:span text:style-name="T89">shall make an atonement</text:span> for him before the LORD for his issue.</text:p>
      <text:p text:style-name="P23"><text:span text:style-name="T88">Lev 15:30</text:span> And the priest shall offer the one for a sin offering, and the other for a burnt offering; and the priest <text:span text:style-name="T89">shall make an atonement</text:span> for her before the LORD for the issue of her uncleanness.</text:p>
      <text:p text:style-name="P23"><text:span text:style-name="T88">Lev 16:6</text:span> And Aaron shall offer his bullock of the sin offering, which is for himself<text:span text:style-name="T89">, and make an atonement</text:span> for himself, and for his house.</text:p>
      <text:p text:style-name="P23"><text:span text:style-name="T88">Lev 16:10</text:span> But the goat, on which the lot fell to be the scapegoat, shall be presented alive before the LORD<text:span text:style-name="T89">, to make an atonement</text:span> with him, and to let him go for a scapegoat into the wilderness.</text:p>
      <text:p text:style-name="P23"><text:span text:style-name="T88">Lev 16:11</text:span> And Aaron shall bring the bullock of the sin offering<text:span text:style-name="T89">, which is for himself, and shall make an atonement</text:span> for himself, and for his house, and shall kill the bullock of the sin offering which is for himself:</text:p>
      <text:p text:style-name="P23"><text:span text:style-name="T88">Lev 16:16</text:span> <text:span text:style-name="T89">And he shall make an atonement</text:span> for the holy place, because of the uncleanness of the children of Israel, and because of their transgressions in all their sins: and so shall he do for the tabernacle of the congregation, that remaineth among them in the midst of their uncleanness.</text:p>
      <text:p text:style-name="P23"><text:span text:style-name="T88">Lev 16:17</text:span> And there shall be no man in the tabernacle of the congregation when he goeth <text:span text:style-name="T89">in to make an atonement</text:span> in the holy place, until he come out<text:span text:style-name="T89">, and have made an atonement</text:span> for himself, and for his household, and for all the congregation of Israel.</text:p>
      <text:p text:style-name="P23"><text:soft-page-break/><text:span text:style-name="T88">Lev 16:18</text:span> And he shall go out unto the altar that is before the LORD<text:span text:style-name="T89">, and make an atonement</text:span> for it; and shall take of the blood of the bullock, and of the blood of the goat, and put it upon the horns of the altar round about.</text:p>
      <text:p text:style-name="P23"><text:span text:style-name="T88">Lev 16:20</text:span> And when he hath made an end <text:span text:style-name="T89">of reconciling</text:span> the holy place, and the tabernacle of the congregation, and the altar, he shall bring the live goat:</text:p>
      <text:p text:style-name="P23"><text:span text:style-name="T88">Lev 16:24</text:span> And he shall wash his flesh with water in the holy place, and put on his garments, and come forth, and offer his burnt offering, and the burnt offering of the people<text:span text:style-name="T89">, and make an atonement</text:span> for himself, and for the people.</text:p>
      <text:p text:style-name="P23"><text:span text:style-name="T88">Lev 16:27</text:span> And the bullock for the sin offering, and the goat for the sin offering, whose blood was brought in <text:span text:style-name="T89">to make atonement</text:span> in the holy place, shall one carry forth without the camp; and they shall burn in the fire their skins, and their flesh, and their dung.</text:p>
      <text:p text:style-name="P23"><text:span text:style-name="T88">Lev 16:30</text:span> For on that day <text:span text:style-name="T89">shall the priest make an atonement</text:span> for you, to cleanse you, that ye may be clean from all your sins before the LORD.</text:p>
      <text:p text:style-name="P23"><text:span text:style-name="T88">Lev 16:32</text:span> And the priest, whom he shall anoint, and whom he shall consecrate to minister in the priest's office in his father's <text:span text:style-name="T89">stead, shall make the atonement</text:span>, and shall put on the linen clothes, even the holy garments:</text:p>
      <text:p text:style-name="P23"><text:span text:style-name="T88">Lev 16:33</text:span> <text:span text:style-name="T89">And he shall make an atonement</text:span> for the holy sanctuary, <text:span text:style-name="T89">and he shall make an atonement</text:span> for the tabernacle of the congregation, and for the altar, <text:span text:style-name="T89">and he shall make an atonement</text:span> for the priests, and for all the people of the congregation.</text:p>
      <text:p text:style-name="P23"><text:span text:style-name="T88">Lev 16:34</text:span> And this shall be an everlasting statute <text:span text:style-name="T89">unto you, to make an atonement</text:span> for the children of Israel for all their sins once a year. And he did as the LORD commanded Moses.</text:p>
      <text:p text:style-name="P23"><text:span text:style-name="T88">Lev 17:11</text:span> For the life of the flesh is in the blood: and I have given it to you upon the altar <text:span text:style-name="T89">to make an atonement</text:span> for your souls: for it is the blood <text:span text:style-name="T89">that maketh an atonement</text:span> for the soul.</text:p>
      <text:p text:style-name="P23"><text:span text:style-name="T88">Lev 19:22</text:span> And the priest <text:span text:style-name="T89">shall make an atonement</text:span> for him with the ram of the trespass offering before the LORD for his sin which he hath done: and the sin which he hath done shall be forgiven him.</text:p>
      <text:p text:style-name="P23"><text:span text:style-name="T88">Lev 23:28</text:span> And ye shall do no work in that same day: for it is a day of atonement<text:span text:style-name="T89">, to make an atonement</text:span> for you before the LORD your God.</text:p>
      <text:p text:style-name="P23"><text:span text:style-name="T88">Num 5:8</text:span> But if the man have no kinsman to recompense the trespass unto, let the trespass be recompensed unto the LORD, even to the priest; beside the ram of the atonement<text:span text:style-name="T89">, whereby an atonement shall be made</text:span> for him.</text:p>
      <text:p text:style-name="P23"><text:span text:style-name="T88">Num 6:11</text:span> And the priest shall offer the one for a sin offering, and the other for a burnt offering<text:span text:style-name="T89">, and make an atonement</text:span> for him, for that he sinned by the dead, and shall hallow his head that same day.</text:p>
      <text:p text:style-name="P23"><text:soft-page-break/><text:span text:style-name="T88">Num 8:12</text:span> And the Levites shall lay their hands upon the heads of the bullocks: and thou shalt offer the one for a sin offering, and the other for a burnt offering, unto the LORD<text:span text:style-name="T89">, to make an atonement</text:span> for the Levites.</text:p>
      <text:p text:style-name="P23"><text:span text:style-name="T88">Num 8:19</text:span> And I have given the Levites as a gift to Aaron and to his sons from among the children of Israel, to do the service of the children of Israel in the tabernacle of the congregation<text:span text:style-name="T89">, and to make an atonement</text:span> for the children of Israel: that there be no plague among the children of Israel, when the children of Israel come nigh unto the sanctuary.</text:p>
      <text:p text:style-name="P23"><text:span text:style-name="T88">Num 8:21</text:span> And the Levites were purified, and they washed their clothes; and Aaron offered them as an offering before the LORD; and Aaron <text:span text:style-name="T89">made an atonement</text:span> for them to cleanse them.</text:p>
      <text:p text:style-name="P23"><text:span text:style-name="T88">Num 15:25</text:span> And the priest <text:span text:style-name="T89">shall make an atonement</text:span> for all the congregation of the children of Israel, and it shall be forgiven them; for it is ignorance: and they shall bring their offering, a sacrifice made by fire unto the LORD, and their sin offering before the LORD, for their ignorance:</text:p>
      <text:p text:style-name="P23"><text:span text:style-name="T88">Num 15:28</text:span> And the priest <text:span text:style-name="T89">shall make an atonement</text:span> for the soul that sinneth ignorantly, when he sinneth by ignorance before the LORD<text:span text:style-name="T89">, to make an atonement</text:span> for him; and it shall be forgiven him.</text:p>
      <text:p text:style-name="P23"><text:span text:style-name="T88">Num 16:46</text:span> And Moses said unto Aaron, Take a censer, and put fire therein from off the altar, and put on incense, and go quickly unto the congregation<text:span text:style-name="T89">, and make an atonement</text:span> for them: for there is wrath gone out from the LORD; the plague is begun.</text:p>
      <text:p text:style-name="P23"><text:span text:style-name="T88">Num 16:47</text:span> And Aaron took as Moses commanded, and ran into the midst of the congregation; and, behold, the plague was begun among the people: and he put on incense<text:span text:style-name="T89">, and made an atonement</text:span> for the people.</text:p>
      <text:p text:style-name="P23"><text:span text:style-name="T88">Num 25:13</text:span> And he shall have it, and his seed after him, even the covenant of an everlasting priesthood; because he was zealous for his God<text:span text:style-name="T89">, and made an atonement</text:span> for the children of Israel.</text:p>
      <text:p text:style-name="P23"><text:span text:style-name="T88">Num 28:22</text:span> And one goat for a sin offering<text:span text:style-name="T89">, to make an atonement</text:span> for you.</text:p>
      <text:p text:style-name="P23"><text:span text:style-name="T88">Num 28:30</text:span> And one kid of the goats<text:span text:style-name="T89">, to make an atonement</text:span> for you.</text:p>
      <text:p text:style-name="P23"><text:span text:style-name="T88">Num 29:5</text:span> And one kid of the goats for a sin offering<text:span text:style-name="T89">, to make an atonement</text:span> for you:</text:p>
      <text:p text:style-name="P23"><text:span text:style-name="T88">Num 31:50</text:span> We have therefore brought an oblation for the LORD, what every man hath gotten, of jewels of gold, chains, and bracelets, rings, earrings, and tablets<text:span text:style-name="T89">, to make an atonement</text:span> for our souls before the LORD.</text:p>
      <text:p text:style-name="P23"><text:span text:style-name="T88">Num 35:33</text:span> So ye shall not pollute the land wherein ye are: for blood it defileth the land: and the land <text:span text:style-name="T89">cannot be cleansed</text:span> of the blood that is shed therein, but by the blood of him that shed it.</text:p>
      <text:p text:style-name="P23"><text:span text:style-name="T88">Deu 21:8</text:span> <text:span text:style-name="T89">Be merciful</text:span>, O LORD, unto thy people Israel, whom thou hast redeemed, and lay not innocent blood unto thy people of Israel's charge. And the blood <text:span text:style-name="T89">shall be forgiven</text:span> them.</text:p>
      <text:p text:style-name="P23"><text:span text:style-name="T88">Deu 32:43</text:span> Rejoice, O ye nations, with his people: for he will avenge the blood of his servants, and will render vengeance to his adversaries<text:span text:style-name="T89">, and will be merciful</text:span> unto his land, and to his people.</text:p>
      <text:p text:style-name="P23"><text:soft-page-break/><text:span text:style-name="T88">1Sa 3:14</text:span> And therefore I have sworn unto the house of Eli, that the iniquity of Eli's house <text:span text:style-name="T89">shall not be purged</text:span> with sacrifice nor offering for ever.</text:p>
      <text:p text:style-name="P23"><text:span text:style-name="T88">2Sa 21:3</text:span> Wherefore David said unto the Gibeonites, What shall I do <text:span text:style-name="T89">for you? and wherewith shall I make the atonement</text:span>, that ye may bless the inheritance of the LORD?</text:p>
      <text:p text:style-name="P23"><text:span text:style-name="T88">1Ch 6:49</text:span> But Aaron and his sons offered upon the altar of the burnt offering, and on the altar of incense, and were appointed for all the work of the place most holy<text:span text:style-name="T89">, and to make an atonement</text:span> for Israel, according to all that Moses the servant of God had commanded.</text:p>
      <text:p text:style-name="P23"><text:span text:style-name="T88">2Ch 29:24</text:span> And the priests killed them, and they made reconciliation with their blood upon the altar<text:span text:style-name="T89">, to make an atonement</text:span> for all Israel: for the king commanded that the burnt offering and the sin offering should be made for all Israel.</text:p>
      <text:p text:style-name="P23"><text:span text:style-name="T88">2Ch 30:18</text:span> For a multitude of the people, even many of Ephraim, and Manasseh, Issachar, and Zebulun, had not cleansed themselves, yet did they eat the passover otherwise than it was written. But Hezekiah prayed for them, saying, The good LORD <text:span text:style-name="T89">pardon</text:span> every one</text:p>
      <text:p text:style-name="P23"><text:span text:style-name="T88">Neh 10:33</text:span> For the shewbread, and for the continual meat offering, and for the continual burnt offering, of the sabbaths, of the new moons, for the set feasts, and for the holy things, and for the sin offerings <text:span text:style-name="T89">to make an atonement</text:span> for Israel, and for all the work of the house of our God.</text:p>
      <text:p text:style-name="P23"><text:span text:style-name="T88">Psa 65:3</text:span> Iniquities prevail against me: as for our transgressions<text:span text:style-name="T89">, thou shalt purge them away</text:span>.</text:p>
      <text:p text:style-name="P23"><text:span text:style-name="T88">Psa 78:38</text:span> But he, being full of compassion<text:span text:style-name="T89">, forgave</text:span> their iniquity, and destroyed them not: yea, many a time turned he his anger away, and did not stir up all his wrath.</text:p>
      <text:p text:style-name="P23"><text:span text:style-name="T88">Psa 79:9</text:span> Help us, O God of our salvation, for the glory of thy name: and deliver <text:span text:style-name="T89">us, and purge away</text:span> our sins, for thy name's sake.</text:p>
      <text:p text:style-name="P23"><text:span text:style-name="T88">Pro 16:6</text:span> By mercy and truth iniquity <text:span text:style-name="T89">is purged</text:span>: and by the fear of the LORD men depart from evil.</text:p>
      <text:p text:style-name="P23"><text:span text:style-name="T88">Pro 16:14</text:span> The wrath of a king is as messengers of death: but a wise man <text:span text:style-name="T89">will pacify</text:span> it.</text:p>
      <text:p text:style-name="P23"><text:span text:style-name="T88">Isa 6:7</text:span> And he laid it upon my mouth, and said, Lo, this hath touched thy lips; and thine iniquity is taken away, and thy sin <text:span text:style-name="T89">purged</text:span>.</text:p>
      <text:p text:style-name="P23"><text:span text:style-name="T88">Isa 22:14</text:span> And it was revealed in mine ears by the LORD of hosts, Surely this iniquity <text:span text:style-name="T89">shall not be purged</text:span> from you till ye die, saith the Lord GOD of hosts.</text:p>
      <text:p text:style-name="P23"><text:span text:style-name="T88">Isa 27:9</text:span> By this therefore shall the iniquity of Jacob <text:span text:style-name="T89">be purged</text:span>; and this is all the fruit to take away his sin; when he maketh all the stones of the altar as chalkstones that are beaten in sunder, the groves and images shall not stand up.</text:p>
      <text:p text:style-name="P23"><text:span text:style-name="T88">Isa 28:18</text:span> And your covenant with death <text:span text:style-name="T89">shall be disannulled</text:span>, and your agreement with hell shall not stand; when the overflowing scourge shall pass through, then ye shall be trodden down by it.</text:p>
      <text:p text:style-name="P23"><text:soft-page-break/><text:span text:style-name="T88">Isa 47:11</text:span> Therefore shall evil come upon thee; thou shalt not know from whence it riseth: and mischief shall fall upon thee; thou shalt not be able <text:span text:style-name="T89">to put it off</text:span>: and desolation shall come upon thee suddenly, which thou shalt not know.</text:p>
      <text:p text:style-name="P23"><text:span text:style-name="T88">Jer 18:23</text:span> Yet, LORD, thou knowest all their counsel against me to slay <text:span text:style-name="T89">me: forgive</text:span> not their iniquity, neither blot out their sin from thy sight, but let them be overthrown before thee; deal thus with them in the time of thine anger.</text:p>
      <text:p text:style-name="P23"><text:span text:style-name="T88">Eze 16:63</text:span> That thou mayest remember, and be confounded, and never open thy mouth any more because of thy shame<text:span text:style-name="T89">, when I am pacified</text:span> toward thee for all that thou hast done, saith the Lord GOD.</text:p>
      <text:p text:style-name="P23"><text:span text:style-name="T88">Eze 43:20</text:span> And thou shalt take of the blood thereof, and put it on the four horns of it, and on the four corners of the settle, and upon the border round about: thus shalt thou cleanse <text:span text:style-name="T89">and purge</text:span> it.</text:p>
      <text:p text:style-name="P23"><text:span text:style-name="T88">Eze 43:26</text:span> Seven days <text:span text:style-name="T89">shall they purge</text:span> the altar and purify it; and they shall consecrate themselves.</text:p>
      <text:p text:style-name="P23"><text:span text:style-name="T88">Eze 45:15</text:span> And one lamb out of the flock, out of two hundred, out of the fat pastures of Israel; for a meat offering, and for a burnt offering, and for peace offerings<text:span text:style-name="T89">, to make reconciliation</text:span> for them, saith the Lord GOD.</text:p>
      <text:p text:style-name="P23"><text:span text:style-name="T88">Eze 45:17</text:span> And it shall be the prince's part to give burnt offerings, and meat offerings, and drink offerings, in the feasts, and in the new moons, and in the sabbaths, in all solemnities of the house of Israel: he shall prepare the sin offering, and the meat offering, and the burnt offering, and the peace offerings<text:span text:style-name="T89">, to make reconciliation</text:span> for the house of Israel.</text:p>
      <text:p text:style-name="P23"><text:span text:style-name="T88">Eze 45:20</text:span> And so thou shalt do the seventh day of the month for every one that erreth, and for him that is simple<text:span text:style-name="T89">: so shall ye reconcile</text:span> the house.</text:p>
      <text:p text:style-name="P24"><text:span text:style-name="T90">Dan 9:24</text:span><text:span text:style-name="T91"> Seventy weeks are determined upon thy people and upon thy holy city, to finish the transgression, and to make an end of sins</text:span><text:span text:style-name="T92">, and to make reconciliation</text:span><text:span text:style-name="T91"> for iniquity, and to bring in everlasting righteousness, and to seal up the vision and prophecy, and to anoint the most Holy.</text:span></text:p>
      <text:p text:style-name="P24"><text:span text:style-name="T91"/></text:p>
      <table:table table:name="Table5" table:style-name="Table5">
        <table:table-column table:style-name="Table5.A"/>
        <table:table-row>
          <table:table-cell table:style-name="Table5.A1" office:value-type="string">
            <text:p text:style-name="P25">H3724 <text:span text:style-name="T93">(a</text:span><text:span text:style-name="T87">ppears 17 times in 17 verses</text:span><text:span text:style-name="T93">)</text:span></text:p>
          </table:table-cell>
        </table:table-row>
      </table:table>
      <text:p text:style-name="P26"/>
      <text:p text:style-name="P27"><text:span text:style-name="T88">Exo 21:30</text:span> If there be laid <text:span text:style-name="T89">on him a sum of money</text:span>, then he shall give for the ransom of his life whatsoever is laid upon him.</text:p>
      <text:p text:style-name="P23"><text:span text:style-name="T88">Exo 30:12</text:span> When thou takest the sum of the children of Israel after their number, then shall they give every man <text:span text:style-name="T89">a ransom</text:span> for his soul unto the LORD, when thou numberest them; that there be no plague among them, when thou numberest them.</text:p>
      <text:p text:style-name="P23"><text:span text:style-name="T88">Num 35:31</text:span> Moreover ye shall take <text:span text:style-name="T89">no satisfaction</text:span> for the life of a murderer, which is guilty of death: but he shall be surely put to death.</text:p>
      <text:p text:style-name="P23"><text:span text:style-name="T88">Num 35:32</text:span> And ye shall take <text:span text:style-name="T89">no satisfaction</text:span> for him that is fled to the city of his refuge, that he should come again to dwell in the land, until the death of the priest.</text:p>
      <text:p text:style-name="P23"><text:span text:style-name="T88">1Sa 6:18</text:span> And the golden mice, according to the number of all the cities of the Philistines belonging to the five lords, both of fenced cities, and of country <text:span text:style-name="T89">villages</text:span>, even unto the great stone of Abel, whereon they set down the ark of the LORD: which stone remaineth unto this day in the field of Joshua, the Bethshemite.</text:p>
      <text:p text:style-name="P23"><text:span text:style-name="T88">1Sa 12:3</text:span> Behold, here I am: witness against me before the LORD, and before his anointed: whose ox have I taken? or whose ass have I taken? or whom have I defrauded? whom have I oppressed? or of whose hand <text:span text:style-name="T89">have I received any bribe</text:span> to blind mine eyes therewith? and I will restore it you.</text:p>
      <text:p text:style-name="P23"><text:span text:style-name="T88">Job 33:24</text:span> Then he is gracious unto him, and saith, Deliver him from going down to the pit: I have found <text:span text:style-name="T89">a ransom</text:span>.</text:p>
      <text:p text:style-name="P23"><text:span text:style-name="T88">Job 36:18</text:span> Because there is wrath, beware lest he take thee away with his stroke: then a great <text:span text:style-name="T89">ransom</text:span> cannot deliver thee.</text:p>
      <text:p text:style-name="P23"><text:span text:style-name="T88">Psa 49:7</text:span> None of them can by any means redeem his brother, nor give to God <text:span text:style-name="T89">a ransom</text:span> for him:</text:p>
      <text:p text:style-name="P23"><text:span text:style-name="T88">Pro 6:35</text:span> He will not regard <text:span text:style-name="T89">any ransom</text:span>; neither will he rest content, though thou givest many gifts.</text:p>
      <text:p text:style-name="P23"><text:span text:style-name="T88">Pro 13:8</text:span> <text:span text:style-name="T89">The ransom</text:span> of a man's life are his riches: but the poor heareth not rebuke.</text:p>
      <text:p text:style-name="P23"><text:span text:style-name="T88">Pro 21:18</text:span> The wicked <text:span text:style-name="T89">shall be a ransom</text:span> for the righteous, and the transgressor for the upright.</text:p>
      <text:p text:style-name="P23"><text:span text:style-name="T88">Son 1:14</text:span> My beloved is unto me as a cluster <text:span text:style-name="T89">of camphire</text:span> in the vineyards of Engedi.</text:p>
      <text:p text:style-name="P23"><text:span text:style-name="T88">Son 4:13</text:span> Thy plants are an orchard of pomegranates, with pleasant fruits<text:span text:style-name="T89">; camphire</text:span>, with spikenard,</text:p>
      <text:p text:style-name="P23"><text:span text:style-name="T88">Isa 43:3</text:span> For I am the LORD thy God, the Holy One of Israel, thy Saviour: I gave Egypt <text:span text:style-name="T89">for thy ransom</text:span>, Ethiopia and Seba for thee.</text:p>
      <text:p text:style-name="P23"><text:span text:style-name="T88">Amo 5:12</text:span> For I know your manifold transgressions and your mighty sins: they afflict the just, they take <text:span text:style-name="T89">a bribe</text:span>, and they turn aside the poor in the gate from their right.</text:p>
      <text:p text:style-name="P28"><text:span text:style-name="T91"/></text:p>
      <text:p text:style-name="P26"><text:soft-page-break/></text:p>
      <table:table table:name="Table6" table:style-name="Table6">
        <table:table-column table:style-name="Table6.A"/>
        <table:table-column table:style-name="Table6.B"/>
        <table:table-row>
          <table:table-cell table:style-name="Table6.A1" table:number-columns-spanned="2" office:value-type="string">
            <text:p text:style-name="P29">Outline of Biblical usage</text:p>
            <text:p text:style-name="P30"><text:span text:style-name="T94">(duplicates removed; </text:span><text:span text:style-name="T95">sorted alphabetically</text:span><text:span text:style-name="T94">)</text:span></text:p>
          </table:table-cell>
          <table:covered-table-cell/>
        </table:table-row>
        <table:table-row>
          <table:table-cell table:style-name="Table6.A2" office:value-type="string">
            <text:p text:style-name="P31">H3722</text:p>
          </table:table-cell>
          <table:table-cell table:style-name="Table6.B2" office:value-type="string">
            <text:p text:style-name="P31">H3724</text:p>
          </table:table-cell>
        </table:table-row>
        <table:table-row table:style-name="Table6.3">
          <table:table-cell table:style-name="Table6.A2" office:value-type="string">
            <text:p text:style-name="P32"><text:span text:style-name="T96">, I will appease</text:span><text:line-break/><text:span text:style-name="T96">, and have made an atonement</text:span><text:line-break/><text:span text:style-name="T96">, and he shall make an atonement</text:span><text:line-break/><text:span text:style-name="T96">, and made an atonement</text:span><text:line-break/><text:span text:style-name="T96">, and make an atonement</text:span><text:line-break/><text:span text:style-name="T97">, and shalt pitch</text:span><text:line-break/><text:span text:style-name="T96">, and to make an atonement</text:span><text:line-break/><text:span text:style-name="T96">, and to make reconciliation</text:span><text:line-break/><text:span text:style-name="T96">, and will be merciful</text:span><text:line-break/><text:span text:style-name="T96">, forgave</text:span><text:line-break/><text:span text:style-name="T96">, thou shalt purge them away</text:span><text:line-break/><text:span text:style-name="T96">, to make an atonement</text:span><text:line-break/><text:span text:style-name="T96">, to make atonement</text:span><text:line-break/><text:span text:style-name="T96">, to make reconciliation</text:span><text:line-break/><text:span text:style-name="T96">, when I am pacified</text:span><text:line-break/><text:span text:style-name="T96">, when thou hast made an atonement</text:span><text:line-break/><text:span text:style-name="T96">, whereby an atonement shall be made</text:span><text:line-break/><text:span text:style-name="T96">, which is for himself, and shall make an atonement</text:span><text:line-break/><text:span text:style-name="T96">: so shall ye reconcile</text:span><text:line-break/><text:span text:style-name="T96">And he shall make an atonement</text:span><text:line-break/><text:span text:style-name="T96">Be merciful</text:span><text:line-break/><text:span text:style-name="T96">I shall make an atonement</text:span><text:line-break/><text:span text:style-name="T96">and purge</text:span><text:line-break/><text:span text:style-name="T96">be purged</text:span><text:line-break/><text:span text:style-name="T96">cannot be cleansed</text:span><text:line-break/><text:span text:style-name="T96">for him to make atonement</text:span><text:line-break/><text:span text:style-name="T96">for you? and wherewith shall I make the atonement</text:span></text:p>
            <text:p text:style-name="P33">in to make an atonement<text:line-break/>is purged<text:line-break/>it, to make reconciliation<text:line-break/>made an atonement<text:line-break/>me: forgive<text:line-break/>of reconciling<text:line-break/>pardon<text:line-break/>purged<text:line-break/>shall be disannulled<text:line-break/>shall be forgiven<text:line-break/>shall he make atonement<text:line-break/>shall make an atonement<text:line-break/>shall not be purged<text:line-break/>shall the priest make an atonement<text:line-break/>shall they purge<text:line-break/>stead, shall make the atonement<text:line-break/>that maketh an atonement<text:line-break/>that maketh atonement<text:line-break/>those things wherewith the atonement was made<text:line-break/>thou shalt make an atonement<text:line-break/>to make an atonement<text:line-break/>to make atonement<text:line-break/>to put it off<text:line-break/>to reconcile<text:line-break/>unto you, to make an atonement<text:line-break/>us, and purge away<text:line-break/>will pacify</text:p>
          </table:table-cell>
          <table:table-cell table:style-name="Table6.B2" office:value-type="string">
            <text:p text:style-name="P34"><text:span text:style-name="T96">; camphire</text:span><text:line-break/><text:span text:style-name="T96">The ransom</text:span><text:line-break/><text:span text:style-name="T96">a bribe</text:span><text:line-break/><text:span text:style-name="T96">a ransom</text:span><text:line-break/><text:span text:style-name="T96">any ransom</text:span><text:line-break/><text:span text:style-name="T96">for thy ransom</text:span><text:line-break/><text:span text:style-name="T96">have I received any bribe</text:span><text:line-break/><text:span text:style-name="T96">no satisfaction</text:span><text:line-break/><text:span text:style-name="T96">of camphire</text:span><text:line-break/><text:span text:style-name="T96">on him a sum of money</text:span><text:line-break/><text:span text:style-name="T96">ransom</text:span><text:line-break/><text:span text:style-name="T96">shall be a ransom</text:span><text:line-break/><text:span text:style-name="T96">villages</text:span><text:line-break/><text:span text:style-name="T97">with pitch</text:span></text:p>
          </table:table-cell>
        </table:table-row>
      </table:table>
      <text:p text:style-name="P35"><text:span text:style-name="T9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Sans-Regular" svg:font-family="LiberationSans-Regular, sans-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2-12T09:53:53.430000000</meta:creation-date>
    <dc:date>2026-07-11T12:31:15.993042920</dc:date>
    <meta:editing-duration>PT9H23M33S</meta:editing-duration>
    <meta:editing-cycles>164</meta:editing-cycles>
    <meta:generator>LibreOffice/26.2.4.2$Linux_X86_64 LibreOffice_project/64a984c51f4702dbd3710b13428c673a2f1292e7</meta:generator>
    <meta:document-statistic meta:table-count="6" meta:image-count="0" meta:object-count="0" meta:page-count="11" meta:paragraph-count="137" meta:word-count="4853" meta:character-count="25590" meta:non-whitespace-character-count="20877"/>
  </office:meta>
</office:document-meta>
</file>