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3.95in" style:rel-column-width="32767*"/>
    </style:style>
    <style:style style:name="Table7.B" style:family="table-column">
      <style:table-column-properties style:column-width="3.95in" style:rel-column-width="32768*"/>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list-style-name="L1">
      <style:text-properties fo:font-size="13pt" officeooo:rsid="000f2ea2" officeooo:paragraph-rsid="000f2ea2" style:font-size-asian="13pt" style:font-size-complex="13pt"/>
    </style:style>
    <style:style style:name="P4" style:family="paragraph" style:parent-style-name="Standard">
      <style:text-properties fo:font-size="13pt" officeooo:rsid="000f2ea2" officeooo:paragraph-rsid="000f2ea2" style:font-size-asian="13pt" style:font-size-complex="13pt"/>
    </style:style>
    <style:style style:name="P5" style:family="paragraph" style:parent-style-name="Table_20_Contents">
      <style:text-properties fo:color="#127622" loext:opacity="100%" fo:font-size="13pt" style:font-size-asian="13pt" style:font-size-complex="13pt"/>
    </style:style>
    <style:style style:name="P6" style:family="paragraph" style:parent-style-name="Table_20_Contents">
      <style:text-properties fo:font-size="13pt" officeooo:paragraph-rsid="0012af29" style:font-size-asian="13pt" style:font-size-complex="13pt"/>
    </style:style>
    <style:style style:name="P7" style:family="paragraph" style:parent-style-name="Standard" style:list-style-name="L2">
      <style:text-properties fo:font-size="13pt" officeooo:rsid="00134dba" officeooo:paragraph-rsid="00134dba" style:font-size-asian="13pt" style:font-size-complex="13pt"/>
    </style:style>
    <style:style style:name="P8" style:family="paragraph" style:parent-style-name="Standard" style:list-style-name="L2">
      <style:text-properties fo:font-size="13pt" officeooo:rsid="00151748" officeooo:paragraph-rsid="00196884" style:font-size-asian="13pt" style:font-size-complex="13pt"/>
    </style:style>
    <style:style style:name="P9" style:family="paragraph" style:parent-style-name="Standard">
      <style:text-properties fo:font-size="13pt" officeooo:rsid="00151748" officeooo:paragraph-rsid="00196884" style:font-size-asian="13pt" style:font-size-complex="13pt"/>
    </style:style>
    <style:style style:name="P10" style:family="paragraph" style:parent-style-name="Standard">
      <style:paragraph-properties fo:text-align="center" style:justify-single-word="false"/>
      <style:text-properties fo:font-size="13pt" officeooo:rsid="002a1053" officeooo:paragraph-rsid="002a1053" style:font-size-asian="13pt" style:font-size-complex="13pt"/>
    </style:style>
    <style:style style:name="P11" style:family="paragraph" style:parent-style-name="Table_20_Contents">
      <style:text-properties fo:font-size="13pt" officeooo:paragraph-rsid="0026ddc5" style:font-size-asian="13pt" style:font-size-complex="13pt"/>
    </style:style>
    <style:style style:name="P12" style:family="paragraph" style:parent-style-name="Table_20_Contents">
      <style:text-properties fo:font-size="13pt" officeooo:paragraph-rsid="0030d4ab" style:font-size-asian="13pt" style:font-size-complex="13pt"/>
    </style:style>
    <style:style style:name="P13" style:family="paragraph" style:parent-style-name="Standard">
      <style:text-properties fo:font-size="13pt" officeooo:rsid="00151748" officeooo:paragraph-rsid="00151748" style:font-size-asian="13pt" style:font-size-complex="13pt"/>
    </style:style>
    <style:style style:name="P14" style:family="paragraph" style:parent-style-name="Table_20_Contents">
      <style:text-properties fo:font-size="13pt" style:font-size-asian="13pt" style:font-size-complex="13pt"/>
    </style:style>
    <style:style style:name="P15" style:family="paragraph" style:parent-style-name="Standard" style:list-style-name="L2">
      <style:text-properties fo:font-size="13pt" officeooo:rsid="00151748" officeooo:paragraph-rsid="003365ac" style:font-size-asian="13pt" style:font-size-complex="13pt"/>
    </style:style>
    <style:style style:name="P16" style:family="paragraph" style:parent-style-name="Standard" style:list-style-name="L2">
      <style:text-properties fo:font-size="13pt" officeooo:rsid="002cfd32" officeooo:paragraph-rsid="003365ac" style:font-size-asian="13pt" style:font-size-complex="13pt"/>
    </style:style>
    <style:style style:name="P17" style:family="paragraph" style:parent-style-name="Standard" style:list-style-name="L2">
      <style:text-properties fo:font-size="13pt" officeooo:rsid="0034196a" officeooo:paragraph-rsid="0034196a" style:font-size-asian="13pt" style:font-size-complex="13pt"/>
    </style:style>
    <style:style style:name="P18" style:family="paragraph" style:parent-style-name="Standard">
      <style:text-properties fo:font-size="13pt" officeooo:rsid="002cfd32" officeooo:paragraph-rsid="003365ac" style:font-size-asian="13pt" style:font-size-complex="13pt"/>
    </style:style>
    <style:style style:name="P19" style:family="paragraph" style:parent-style-name="Table_20_Contents">
      <style:text-properties fo:font-size="13pt" officeooo:paragraph-rsid="001d48a2" style:font-size-asian="13pt" style:font-size-complex="13pt"/>
    </style:style>
    <style:style style:name="P20" style:family="paragraph" style:parent-style-name="Standard" style:list-style-name="L3">
      <style:text-properties fo:font-size="13pt" officeooo:rsid="001e93b2" officeooo:paragraph-rsid="001e93b2" style:font-size-asian="13pt" style:font-size-complex="13pt"/>
    </style:style>
    <style:style style:name="P21" style:family="paragraph" style:parent-style-name="Standard" style:list-style-name="L3">
      <style:text-properties fo:font-size="13pt" officeooo:rsid="001fb398" officeooo:paragraph-rsid="001fb398" style:font-size-asian="13pt" style:font-size-complex="13pt"/>
    </style:style>
    <style:style style:name="P22" style:family="paragraph" style:parent-style-name="Standard" style:list-style-name="L3">
      <style:text-properties fo:font-size="13pt" officeooo:rsid="0025305d" officeooo:paragraph-rsid="0025305d" style:font-size-asian="13pt" style:font-size-complex="13pt"/>
    </style:style>
    <style:style style:name="P23" style:family="paragraph" style:parent-style-name="Standard">
      <style:text-properties fo:font-size="13pt" officeooo:rsid="0025305d" officeooo:paragraph-rsid="0025305d" style:font-size-asian="13pt" style:font-size-complex="13pt"/>
    </style:style>
    <style:style style:name="P24" style:family="paragraph" style:parent-style-name="Standard" style:list-style-name="L4">
      <style:text-properties fo:font-size="13pt" officeooo:rsid="00413ca1" officeooo:paragraph-rsid="00413ca1" style:font-size-asian="13pt" style:font-size-complex="13pt"/>
    </style:style>
    <style:style style:name="P25" style:family="paragraph" style:parent-style-name="Standard">
      <style:text-properties fo:font-size="13pt" officeooo:rsid="00262964" officeooo:paragraph-rsid="003515fb" style:font-size-asian="13pt" style:font-size-complex="13pt"/>
    </style:style>
    <style:style style:name="P26" style:family="paragraph" style:parent-style-name="Standard" style:list-style-name="L5">
      <style:text-properties fo:font-size="13pt" officeooo:paragraph-rsid="003515fb" style:font-size-asian="13pt" style:font-size-complex="13pt"/>
    </style:style>
    <style:style style:name="P27" style:family="paragraph" style:parent-style-name="Standard" style:list-style-name="L5">
      <style:text-properties fo:font-size="13pt" officeooo:rsid="003b4efd" officeooo:paragraph-rsid="003b4efd" style:font-size-asian="13pt" style:font-size-complex="13pt"/>
    </style:style>
    <style:style style:name="P28" style:family="paragraph" style:parent-style-name="Standard" style:list-style-name="L5">
      <style:text-properties fo:font-size="13pt" officeooo:rsid="003e0ae2" officeooo:paragraph-rsid="003e0ae2" style:font-size-asian="13pt" style:font-size-complex="13pt"/>
    </style:style>
    <style:style style:name="P29" style:family="paragraph" style:parent-style-name="Standard">
      <style:text-properties fo:font-size="13pt" officeooo:rsid="003e0ae2" officeooo:paragraph-rsid="003e0ae2" style:font-size-asian="13pt" style:font-size-complex="13pt"/>
    </style:style>
    <style:style style:name="P30" style:family="paragraph" style:parent-style-name="Standard">
      <style:text-properties fo:color="#127622" loext:opacity="100%" fo:font-size="13pt" officeooo:rsid="003e0ae2" officeooo:paragraph-rsid="003e0ae2" style:font-size-asian="13pt" style:font-size-complex="13pt"/>
    </style:style>
    <style:style style:name="P31" style:family="paragraph" style:parent-style-name="Standard" style:list-style-name="L6">
      <style:text-properties fo:font-size="13pt" officeooo:rsid="004bda14" officeooo:paragraph-rsid="004bda14" style:font-size-asian="13pt" style:font-size-complex="13pt"/>
    </style:style>
    <style:style style:name="P32" style:family="paragraph" style:parent-style-name="Standard" style:list-style-name="L6">
      <style:text-properties fo:font-size="13pt" officeooo:rsid="004c017d" officeooo:paragraph-rsid="004c017d" style:font-size-asian="13pt" style:font-size-complex="13pt"/>
    </style:style>
    <style:style style:name="P33" style:family="paragraph" style:parent-style-name="Standard" style:list-style-name="L6">
      <style:text-properties fo:font-size="13pt" officeooo:rsid="004e5abb" officeooo:paragraph-rsid="004e5abb" style:font-size-asian="13pt" style:font-size-complex="13pt"/>
    </style:style>
    <style:style style:name="P34" style:family="paragraph" style:parent-style-name="Table_20_Contents">
      <style:paragraph-properties fo:text-align="center" style:justify-single-word="false"/>
      <style:text-properties fo:font-size="13pt" officeooo:rsid="004a38eb" officeooo:paragraph-rsid="004a38eb" style:font-size-asian="13pt" style:font-size-complex="13pt"/>
    </style:style>
    <style:style style:name="P35" style:family="paragraph" style:parent-style-name="Table_20_Contents">
      <style:text-properties fo:font-size="13pt" officeooo:rsid="004a38eb" officeooo:paragraph-rsid="004a38eb" style:font-size-asian="13pt" style:font-size-complex="13pt"/>
    </style:style>
    <style:style style:name="P36" style:family="paragraph" style:parent-style-name="Table_20_Contents">
      <style:text-properties fo:color="#127622" loext:opacity="100%" fo:font-size="13pt" officeooo:rsid="003e0ae2" style:font-size-asian="13pt" style:font-size-complex="13pt"/>
    </style:style>
    <style:style style:name="P37" style:family="paragraph" style:parent-style-name="Standard">
      <style:paragraph-properties fo:text-align="center" style:justify-single-word="false" fo:break-before="page"/>
      <style:text-properties officeooo:rsid="00517927" officeooo:paragraph-rsid="00517927"/>
    </style:style>
    <style:style style:name="P38" style:family="paragraph" style:parent-style-name="Table_20_Contents">
      <style:text-properties style:use-window-font-color="true" loext:opacity="0%" fo:font-size="13pt" fo:background-color="transparent" style:font-size-asian="13pt" style:font-size-complex="13pt"/>
    </style:style>
    <style:style style:name="P39" style:family="paragraph" style:parent-style-name="Standard">
      <style:paragraph-properties fo:break-before="page"/>
      <style:text-properties fo:font-size="13pt" officeooo:rsid="005483af" officeooo:paragraph-rsid="005483af" style:font-size-asian="13pt" style:font-size-complex="13pt"/>
    </style:style>
    <style:style style:name="P40" style:family="paragraph" style:parent-style-name="Standard">
      <style:text-properties fo:font-size="13pt" officeooo:rsid="005483af" officeooo:paragraph-rsid="005483af" style:font-size-asian="13pt" style:font-size-complex="13pt"/>
    </style:style>
    <style:style style:name="P41" style:family="paragraph" style:parent-style-name="Standard" style:list-style-name="L7">
      <style:text-properties officeooo:paragraph-rsid="003e0ae2"/>
    </style:style>
    <style:style style:name="P42" style:family="paragraph" style:parent-style-name="Standard" style:list-style-name="L7">
      <style:text-properties officeooo:rsid="005bdf4d" officeooo:paragraph-rsid="005bdf4d"/>
    </style:style>
    <style:style style:name="P43" style:family="paragraph" style:parent-style-name="Standard" style:list-style-name="L7">
      <style:text-properties officeooo:rsid="00593763" officeooo:paragraph-rsid="00593763"/>
    </style:style>
    <style:style style:name="P44" style:family="paragraph" style:parent-style-name="Standard">
      <style:text-properties officeooo:rsid="005ff48b" officeooo:paragraph-rsid="005ff48b"/>
    </style:style>
    <style:style style:name="P45" style:family="paragraph" style:parent-style-name="Standard" style:list-style-name="L8">
      <style:text-properties fo:font-size="13pt" officeooo:rsid="005ff48b" officeooo:paragraph-rsid="005ff48b" style:font-size-asian="13pt" style:font-size-complex="13pt"/>
    </style:style>
    <style:style style:name="P46" style:family="paragraph" style:parent-style-name="Standard" style:list-style-name="L8">
      <style:text-properties officeooo:rsid="0065d0d4" officeooo:paragraph-rsid="0065d0d4"/>
    </style:style>
    <style:style style:name="P47" style:family="paragraph" style:parent-style-name="Standard" style:list-style-name="L8">
      <style:text-properties officeooo:rsid="005ff48b" officeooo:paragraph-rsid="005ff48b"/>
    </style:style>
    <style:style style:name="T1" style:family="text">
      <style:text-properties officeooo:rsid="00230c76"/>
    </style:style>
    <style:style style:name="T2" style:family="text">
      <style:text-properties fo:color="#127622" loext:opacity="100%"/>
    </style:style>
    <style:style style:name="T3" style:family="text">
      <style:text-properties fo:color="#127622" loext:opacity="100%" officeooo:rsid="00230c76"/>
    </style:style>
    <style:style style:name="T4" style:family="text">
      <style:text-properties officeooo:rsid="0012af29"/>
    </style:style>
    <style:style style:name="T5" style:family="text">
      <style:text-properties fo:color="#127622" loext:opacity="100%" officeooo:rsid="0012af29"/>
    </style:style>
    <style:style style:name="T6" style:family="text">
      <style:text-properties officeooo:rsid="002a2fff"/>
    </style:style>
    <style:style style:name="T7" style:family="text">
      <style:text-properties officeooo:rsid="00160a8f"/>
    </style:style>
    <style:style style:name="T8" style:family="text">
      <style:text-properties officeooo:rsid="002bacab"/>
    </style:style>
    <style:style style:name="T9" style:family="text">
      <style:text-properties style:text-position="super 58%"/>
    </style:style>
    <style:style style:name="T10" style:family="text">
      <style:text-properties officeooo:rsid="0026ddc5"/>
    </style:style>
    <style:style style:name="T11" style:family="text">
      <style:text-properties fo:background-color="#ffff00" loext:char-shading-value="0"/>
    </style:style>
    <style:style style:name="T12" style:family="text">
      <style:text-properties officeooo:rsid="0030d4ab"/>
    </style:style>
    <style:style style:name="T13" style:family="text">
      <style:text-properties fo:color="#ff0000" loext:opacity="100%" fo:background-color="#ffff00" loext:char-shading-value="0"/>
    </style:style>
    <style:style style:name="T14" style:family="text">
      <style:text-properties fo:color="#ff0000" loext:opacity="100%"/>
    </style:style>
    <style:style style:name="T15" style:family="text">
      <style:text-properties fo:font-weight="bold" style:font-weight-asian="bold" style:font-weight-complex="bold"/>
    </style:style>
    <style:style style:name="T16" style:family="text">
      <style:text-properties officeooo:rsid="00196884"/>
    </style:style>
    <style:style style:name="T17" style:family="text">
      <style:text-properties officeooo:rsid="001b869e"/>
    </style:style>
    <style:style style:name="T18" style:family="text">
      <style:text-properties fo:font-style="italic" officeooo:rsid="00196884" style:font-style-asian="italic" style:font-style-complex="italic"/>
    </style:style>
    <style:style style:name="T19" style:family="text">
      <style:text-properties officeooo:rsid="002fa7dd"/>
    </style:style>
    <style:style style:name="T20" style:family="text">
      <style:text-properties officeooo:rsid="002df7e0"/>
    </style:style>
    <style:style style:name="T21" style:family="text">
      <style:text-properties officeooo:rsid="00719d86"/>
    </style:style>
    <style:style style:name="T22" style:family="text">
      <style:text-properties officeooo:rsid="0072fb70"/>
    </style:style>
    <style:style style:name="T23" style:family="text">
      <style:text-properties officeooo:rsid="001d48a2"/>
    </style:style>
    <style:style style:name="T24" style:family="text">
      <style:text-properties officeooo:rsid="002453b2"/>
    </style:style>
    <style:style style:name="T25" style:family="text">
      <style:text-properties officeooo:rsid="0025305d"/>
    </style:style>
    <style:style style:name="T26" style:family="text">
      <style:text-properties fo:font-style="italic" style:font-style-asian="italic" style:font-style-complex="italic"/>
    </style:style>
    <style:style style:name="T27" style:family="text">
      <style:text-properties officeooo:rsid="0020efcc"/>
    </style:style>
    <style:style style:name="T28" style:family="text">
      <style:text-properties officeooo:rsid="00262964"/>
    </style:style>
    <style:style style:name="T29" style:family="text">
      <style:text-properties officeooo:rsid="00350104"/>
    </style:style>
    <style:style style:name="T30" style:family="text">
      <style:text-properties officeooo:rsid="0037bb7c"/>
    </style:style>
    <style:style style:name="T31" style:family="text">
      <style:text-properties officeooo:rsid="003a63c0"/>
    </style:style>
    <style:style style:name="T32" style:family="text">
      <style:text-properties officeooo:rsid="003cc36f"/>
    </style:style>
    <style:style style:name="T33" style:family="text">
      <style:text-properties officeooo:rsid="003d9abf"/>
    </style:style>
    <style:style style:name="T34" style:family="text">
      <style:text-properties officeooo:rsid="003fe176"/>
    </style:style>
    <style:style style:name="T35" style:family="text">
      <style:text-properties officeooo:rsid="003ff76a"/>
    </style:style>
    <style:style style:name="T36" style:family="text">
      <style:text-properties fo:font-style="italic" officeooo:rsid="003ff76a" style:font-style-asian="italic" style:font-style-complex="italic"/>
    </style:style>
    <style:style style:name="T37" style:family="text">
      <style:text-properties style:text-position="super 58%" officeooo:rsid="0044fba1"/>
    </style:style>
    <style:style style:name="T38" style:family="text">
      <style:text-properties officeooo:rsid="0052fdf2"/>
    </style:style>
    <style:style style:name="T39" style:family="text">
      <style:text-properties fo:background-color="transparent" loext:char-shading-value="0"/>
    </style:style>
    <style:style style:name="T40" style:family="text">
      <style:text-properties fo:color="#127622" loext:opacity="100%" fo:font-size="13pt" officeooo:rsid="003e0ae2" style:font-size-asian="13pt" style:font-size-complex="13pt"/>
    </style:style>
    <style:style style:name="T41" style:family="text">
      <style:text-properties fo:font-size="13pt" style:font-size-asian="13pt" style:font-size-complex="13pt"/>
    </style:style>
    <style:style style:name="T42" style:family="text">
      <style:text-properties fo:font-size="13pt" officeooo:rsid="004774bb" style:font-size-asian="13pt" style:font-size-complex="13pt"/>
    </style:style>
    <style:style style:name="T43" style:family="text">
      <style:text-properties officeooo:rsid="005657ee"/>
    </style:style>
    <style:style style:name="T44" style:family="text">
      <style:text-properties fo:font-size="13pt" officeooo:rsid="003e0ae2" style:font-size-asian="13pt" style:font-size-complex="13pt"/>
    </style:style>
    <style:style style:name="T45" style:family="text">
      <style:text-properties fo:font-size="13pt" officeooo:rsid="005ab321" style:font-size-asian="13pt" style:font-size-complex="13pt"/>
    </style:style>
    <style:style style:name="T46" style:family="text">
      <style:text-properties fo:font-size="13pt" officeooo:rsid="005d3a5c" style:font-size-asian="13pt" style:font-size-complex="13pt"/>
    </style:style>
    <style:style style:name="T47" style:family="text">
      <style:text-properties fo:font-size="13pt" officeooo:rsid="005f057c" style:font-size-asian="13pt" style:font-size-complex="13pt"/>
    </style:style>
    <style:style style:name="T48" style:family="text">
      <style:text-properties fo:font-size="13pt" officeooo:rsid="005f1488" style:font-size-asian="13pt" style:font-size-complex="13pt"/>
    </style:style>
    <style:style style:name="T49" style:family="text">
      <style:text-properties fo:font-weight="bold" officeooo:rsid="0063bd18" style:font-weight-asian="bold" style:font-weight-complex="bold"/>
    </style:style>
    <style:style style:name="T50" style:family="text">
      <style:text-properties officeooo:rsid="0063bd18"/>
    </style:style>
    <style:style style:name="T51" style:family="text">
      <style:text-properties fo:font-weight="bold" officeooo:rsid="00614a8f" style:font-weight-asian="bold" style:font-weight-complex="bold"/>
    </style:style>
    <style:style style:name="T52" style:family="text">
      <style:text-properties officeooo:rsid="005ff48b"/>
    </style:style>
    <style:style style:name="T53" style:family="text">
      <style:text-properties fo:font-size="13pt" officeooo:rsid="006e08d5" style:font-size-asian="13pt" style:font-size-complex="13pt"/>
    </style:style>
    <style:style style:name="T54" style:family="text">
      <style:text-properties fo:font-size="13pt" officeooo:rsid="006fe0e6" style:font-size-asian="13pt" style:font-size-complex="13pt"/>
    </style:style>
    <style:style style:name="T55" style:family="text">
      <style:text-properties fo:color="#127622" loext:opacity="100%" fo:font-size="13pt" style:font-size-asian="13pt" style:font-size-complex="13pt"/>
    </style:style>
    <style:style style:name="T56" style:family="text">
      <style:text-properties fo:font-size="13pt" officeooo:rsid="006a83ee" style:font-size-asian="13pt" style:font-size-complex="13pt"/>
    </style:style>
    <style:style style:name="T57" style:family="text">
      <style:text-properties fo:font-size="13pt" officeooo:rsid="006b6686" style:font-size-asian="13pt" style:font-size-complex="13pt"/>
    </style:style>
    <style:style style:name="T58" style:family="text">
      <style:text-properties fo:color="#127622" loext:opacity="100%" fo:font-size="13pt" officeooo:rsid="006b6686" style:font-size-asian="13pt" style:font-size-complex="13pt"/>
    </style:style>
    <style:style style:name="T59" style:family="text">
      <style:text-properties fo:color="#127622" loext:opacity="100%" fo:font-size="13pt" officeooo:rsid="0067a919" style:font-size-asian="13pt" style:font-size-complex="13pt"/>
    </style:style>
    <style:style style:name="T60" style:family="text">
      <style:text-properties fo:font-size="13pt" officeooo:rsid="0067a919" style:font-size-asian="13pt" style:font-size-complex="13pt"/>
    </style:style>
    <style:style style:name="T61" style:family="text">
      <style:text-properties fo:font-size="13pt" officeooo:rsid="00687d30" style:font-size-asian="13pt" style:font-size-complex="13pt"/>
    </style:style>
    <style:style style:name="T62" style:family="text">
      <style:text-properties fo:font-size="13pt" officeooo:rsid="0069b1b0" style:font-size-asian="13pt" style:font-size-complex="13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bakkuk 2:20</text:p>
      <text:p text:style-name="P2">But the LORD is in his holy temple: let all the earth keep silence before him.</text:p>
      <text:p text:style-name="P2"/>
      <text:list text:style-name="L1">
        <text:list-item>
          <text:p text:style-name="P3">This verse is part of the LORD’s response to Habakkuk’s second petition and the next verse following it begins Habakkuk’s prayer which we looked at <text:span text:style-name="T1">a little</text:span> in the study on <text:span text:style-name="T2">Hab</text:span><text:span text:style-name="T3">akkuk </text:span><text:span text:style-name="T2">3:19</text:span>.</text:p>
        </text:list-item>
      </text:list>
      <text:p text:style-name="P4"/>
      <table:table table:name="Table1" table:style-name="Table1">
        <table:table-column table:style-name="Table1.A"/>
        <table:table-row>
          <table:table-cell table:style-name="Table1.A1" office:value-type="string">
            <text:p text:style-name="P5">Habakkuk 2:18-20</text:p>
            <text:p text:style-name="P6"><text:span text:style-name="T4">[</text:span><text:span text:style-name="T5">18</text:span><text:span text:style-name="T4">] </text:span>What profiteth the graven image that the maker thereof hath graven it; the molten image, and a teacher of lies, that the maker of his work trusteth therein, to make dumb idols?</text:p>
            <text:p text:style-name="P6">[<text:span text:style-name="T2">19</text:span>] Woe unto him that saith to the wood, Awake; to the dumb stone, Arise, it shall teach! Behold, it is laid over with gold and silver, and there is no breath at all in the midst of it.</text:p>
            <text:p text:style-name="P6">[<text:span text:style-name="T2">20</text:span>] But the LORD is in his holy temple: let all the earth keep silence before him.</text:p>
          </table:table-cell>
        </table:table-row>
      </table:table>
      <text:p text:style-name="P4"/>
      <text:list text:style-name="L2">
        <text:list-item>
          <text:p text:style-name="P7">The LORD’s response concludes with a description of the unprofitability (vanity, useless<text:span text:style-name="T6">ness</text:span>, <text:span text:style-name="T6">e</text:span>mpt<text:span text:style-name="T6">iness</text:span>) of graven images and idols.</text:p>
        </text:list-item>
        <text:list-item>
          <text:p text:style-name="P8">While we may not make statutes or wooden figures to worship <text:span text:style-name="T7">and/or to pray to </text:span>the warning about idols throughout the bible is still as much applicable today as it was back then. That is because idolatry begins in <text:span text:style-name="T7">the</text:span> <text:span text:style-name="T8">heart.</text:span></text:p>
        </text:list-item>
      </text:list>
      <text:p text:style-name="P9"/>
      <text:p text:style-name="P10">The 2<text:span text:style-name="T9">nd</text:span> commandment in the old and new testament</text:p>
      <table:table table:name="Table4" table:style-name="Table4">
        <table:table-column table:style-name="Table4.A"/>
        <table:table-row>
          <table:table-cell table:style-name="Table4.A1" office:value-type="string">
            <text:p text:style-name="P5">Exodus 20:4-6</text:p>
            <text:p text:style-name="P11"><text:span text:style-name="T10">[</text:span><text:span text:style-name="T2">4</text:span><text:span text:style-name="T10">] </text:span>Thou shalt not make unto thee any graven image, or any likeness of any thing that is in heaven above, or that is in the earth beneath, or that is in the water under the earth:</text:p>
            <text:p text:style-name="P11">[<text:span text:style-name="T2">5</text:span>] <text:span text:style-name="T11">Thou shalt not bow down thyself to them</text:span>, <text:span text:style-name="T11">nor serve them</text:span>: for I the LORD thy God am a jealous God, visiting the iniquity of the fathers upon the children unto the third and fourth generation of them that hate me;</text:p>
            <text:p text:style-name="P11">[<text:span text:style-name="T2">6</text:span>] And shewing mercy unto thousands of them that love me, and keep my commandments.</text:p>
          </table:table-cell>
        </table:table-row>
        <table:table-row>
          <table:table-cell table:style-name="Table4.A2" office:value-type="string">
            <text:p text:style-name="P5">Matthew 22:37-40</text:p>
            <text:p text:style-name="P12"><text:span text:style-name="T12">[</text:span><text:span text:style-name="T2">37</text:span><text:span text:style-name="T12">] </text:span>Jesus said unto him, <text:span text:style-name="T13">Thou shalt love the Lord thy God with all thy heart, and with all thy soul, and with all thy mind.</text:span></text:p>
            <text:p text:style-name="P12">[<text:span text:style-name="T2">38</text:span>] <text:span text:style-name="T14">This is the first and great commandment.</text:span></text:p>
            <text:p text:style-name="P12">[<text:span text:style-name="T2">39</text:span>] <text:span text:style-name="T14">And the second is like unto it, Thou shalt love thy neighbour as thyself.</text:span></text:p>
            <text:p text:style-name="P12">[<text:span text:style-name="T2">40</text:span>] <text:span text:style-name="T13">On these two commandments hang all the law and the prophets.</text:span></text:p>
          </table:table-cell>
        </table:table-row>
      </table:table>
      <text:p text:style-name="P13"/>
      <table:table table:name="Table2" table:style-name="Table2">
        <table:table-column table:style-name="Table2.A"/>
        <table:table-row>
          <table:table-cell table:style-name="Table2.A1" office:value-type="string">
            <text:p text:style-name="P14"><text:span text:style-name="T15">IDOL'ATRY</text:span>, noun [Latin idololatria. Gr. idol, and to worship or serve.]</text:p>
            <text:p text:style-name="P14"/>
            <text:p text:style-name="P14">1. The worship of idols, images, or any thing made by hands, or which is not God.</text:p>
            <text:p text:style-name="P14">2. Excessive attachment or veneration for any thing, or that which borders on adoration.</text:p>
          </table:table-cell>
        </table:table-row>
        <table:table-row>
          <table:table-cell table:style-name="Table2.A2" office:value-type="string">
            <text:p text:style-name="P14"><text:span text:style-name="T15">VENERA'TION</text:span>, noun [Latin veneratio.]</text:p>
            <text:p text:style-name="P14"/>
            <text:p text:style-name="P14">The highest degree of respect and reverence; respect mingled with some degree of awe; a feeling or sentiment excited by the dignity and superiority of a person, or by the sacredness of his character, and with regard to place, by its consecration to sacred services.</text:p>
          </table:table-cell>
        </table:table-row>
      </table:table>
      <text:p text:style-name="P13"/>
      <text:list text:continue-numbering="true" text:style-name="L2">
        <text:list-item>
          <text:p text:style-name="P15"><text:span text:style-name="T7">Idolatry </text:span><text:span text:style-name="T16">is not only </text:span><text:span text:style-name="T17">the </text:span><text:span text:style-name="T16">worship of graven images but includes excessive attachment or veneration for any </text:span><text:span text:style-name="T18">thing</text:span><text:span text:style-name="T16">.</text:span></text:p>
        </text:list-item>
        <text:list-item>
          <text:p text:style-name="P16"><text:soft-page-break/>It’s important to constantly keep an eye out for idols in our life and if needed get rid of them <text:span text:style-name="T19">or put them in their proper place </text:span><text:span text:style-name="T20">because t</text:span>hey will always cause trouble with our relationship with God. <text:span text:style-name="T21">If you don’t think there are any idols in your life you can ask God to point them out for you </text:span><text:span text:style-name="T22">and then wait for Him.</text:span></text:p>
        </text:list-item>
        <text:list-item>
          <text:p text:style-name="P17">In order to do so, we need to be able to identify idols in our life.</text:p>
        </text:list-item>
      </text:list>
      <text:p text:style-name="P18"/>
      <table:table table:name="Table3" table:style-name="Table3">
        <table:table-column table:style-name="Table3.A"/>
        <table:table-row>
          <table:table-cell table:style-name="Table3.A1" office:value-type="string">
            <text:p text:style-name="P5">1 Samuel 15:22-23</text:p>
            <text:p text:style-name="P19"><text:span text:style-name="T23">[</text:span><text:span text:style-name="T2">22</text:span><text:span text:style-name="T23">] </text:span>And Samuel said, Hath the LORD as great delight in burnt offerings and sacrifices, as in obeying the voice of the LORD? Behold, to obey is better than sacrifice, and to hearken than the fat of rams.</text:p>
            <text:p text:style-name="P19">[<text:span text:style-name="T2">23</text:span>] For rebellion is as the sin of witchcraft, and <text:span text:style-name="T11">stubbornness is as</text:span> iniquity and <text:span text:style-name="T11">idolatry</text:span>. Because thou hast rejected the word of the LORD, he hath also rejected thee from being king.</text:p>
          </table:table-cell>
        </table:table-row>
      </table:table>
      <text:p text:style-name="P13"/>
      <text:list text:style-name="L3">
        <text:list-item>
          <text:p text:style-name="P20">Here we learn that stubbornness is as idolatry. How can that be? When we stubbornly refuse the word of the LORD what are we doing? We mistakenly think that something else is more important or more valuable than what the LORD is offering (<text:span text:style-name="T24">a few examples may be: </text:span>an opinion, a person, or a thing).</text:p>
        </text:list-item>
        <text:list-item>
          <text:p text:style-name="P21">When we do that we are placing that <text:span text:style-name="T25">person/opinion/</text:span>thing <text:span text:style-name="T26">above</text:span> God and it <text:span text:style-name="T27">becomes an idol.</text:span></text:p>
        </text:list-item>
        <text:list-item>
          <text:p text:style-name="P22">Thus, an idol is also anything that we place above God.</text:p>
        </text:list-item>
      </text:list>
      <text:p text:style-name="P23"/>
      <table:table table:name="Table5" table:style-name="Table5">
        <table:table-column table:style-name="Table5.A"/>
        <table:table-row>
          <table:table-cell table:style-name="Table5.A1" office:value-type="string">
            <text:p text:style-name="P5">Colossians 3:5</text:p>
            <text:p text:style-name="P14">Mortify therefore your members which are upon the earth; <text:span text:style-name="T11">fornication</text:span>, <text:span text:style-name="T11">uncleanness</text:span>, <text:span text:style-name="T11">inordinate</text:span> <text:span text:style-name="T11">affection</text:span>, <text:span text:style-name="T11">evil concupiscence</text:span>, and <text:span text:style-name="T11">covetousness</text:span>, which is idolatry:</text:p>
          </table:table-cell>
        </table:table-row>
      </table:table>
      <text:p text:style-name="P23"/>
      <text:list text:style-name="L4">
        <text:list-item>
          <text:p text:style-name="P24">Here we learn that fornication, uncleanness, inordinate affection, evil concupiscence and covetousness are all idolatry.</text:p>
        </text:list-item>
      </text:list>
      <text:p text:style-name="P23"/>
      <text:p text:style-name="P25">Here’s how easy the sin of idolatry is to fall into:</text:p>
      <text:list text:style-name="L5">
        <text:list-item>
          <text:p text:style-name="P26"><text:span text:style-name="T28">We read the bible and God tells us to do something a specific way. A situation arises and we </text:span><text:span text:style-name="T10">panic and ask a friend for advice and that advice is not how God tells us how to handle the situation. We take the friends advice and do what they told us. We just committed the sin of idolatry </text:span><text:span text:style-name="T29">and the idol is the friend </text:span><text:span text:style-name="T30">because we placed </text:span><text:span text:style-name="T31">their opinion above God’s.</text:span></text:p>
        </text:list-item>
        <text:list-item>
          <text:p text:style-name="P27">Say we like to play football but the games are only and always on Sunday. Do you think God will understand because they only play on Sundays? In the new testament the apostles preached the gospel on the sabbath (Saturday) in the synagogues (when the Jews met for worship and fellowship) and on Sunday they met for fellowship, prayer, and worship on Sunday. <text:span text:style-name="T32">Biblical Christians today still follow th</text:span><text:span text:style-name="T33">e same example given to us in the new testament.</text:span></text:p>
        </text:list-item>
        <text:list-item>
          <text:p text:style-name="P28">Say we’re walking down the street on a cold winter night. We have a coat and a cloak on to stay warm. A robber comes upon us and steals our cloak and then attempts to take our coat also but we resist <text:span text:style-name="T34">and kick the robber to scare him away</text:span>. We just committed multiple sins including idolatry (<text:span text:style-name="T2">Lk. 6:29</text:span>). <text:span text:style-name="T35">In this case the idol is </text:span><text:span text:style-name="T36">ourself</text:span><text:span text:style-name="T35">.</text:span></text:p>
        </text:list-item>
      </text:list>
      <text:p text:style-name="P29"/>
      <text:p text:style-name="P29"/>
      <text:p text:style-name="P29"/>
      <text:p text:style-name="P29"/>
      <text:p text:style-name="P29"/>
      <text:p text:style-name="P29"/>
      <text:p text:style-name="P30"><text:soft-page-break/>Habakkuk 2:20</text:p>
      <text:p text:style-name="P29">But the LORD is in his holy temple: let all the earth <text:span text:style-name="T11">keep silence</text:span><text:span text:style-name="T37">H2013</text:span> before him.</text:p>
      <text:p text:style-name="P29"/>
      <text:list text:style-name="L6">
        <text:list-item>
          <text:p text:style-name="P31">This verse is the last verse is God’s response to Habakkuk.</text:p>
        </text:list-item>
        <text:list-item>
          <text:p text:style-name="P32">Notice how it begins with “but”?</text:p>
        </text:list-item>
        <text:list-item>
          <text:p text:style-name="P33">The “but” could be relative to the nearest previous topic (idolatry, Hab. 2:18,19) or it could be relative to the entire response (Hab. 2:2-19) <text:span text:style-name="T38">to Habakkuk’s second petition to God (Hab. 1:12-2:1).</text:span></text:p>
        </text:list-item>
      </text:list>
      <text:p text:style-name="P29"/>
      <table:table table:name="Table7" table:style-name="Table7">
        <table:table-column table:style-name="Table7.A"/>
        <table:table-column table:style-name="Table7.B"/>
        <table:table-row>
          <table:table-cell table:style-name="Table7.A1" office:value-type="string">
            <text:p text:style-name="P34">H2013</text:p>
          </table:table-cell>
          <table:table-cell table:style-name="Table7.B1" office:value-type="string">
            <text:p text:style-name="P35">הָסָה hâçâh, haw-saw'; a primitive root; to hush:—hold peace (tongue), (keep) silence, be silent, still.</text:p>
          </table:table-cell>
        </table:table-row>
      </table:table>
      <text:p text:style-name="P29"/>
      <table:table table:name="Table6" table:style-name="Table6">
        <table:table-column table:style-name="Table6.A"/>
        <table:table-row>
          <table:table-cell table:style-name="Table6.A1" office:value-type="string">
            <text:p text:style-name="P36">Numbers 13:30</text:p>
            <text:p text:style-name="P14">And Caleb <text:span text:style-name="T11">stilled</text:span><text:span text:style-name="T9">H2013</text:span> the people before Moses, and said, Let us go up at once, and possess it; for we are well able to overcome it.</text:p>
            <text:p text:style-name="P14"/>
            <text:p text:style-name="P36">Judges 3:19</text:p>
            <text:p text:style-name="P14">But he himself turned again from the quarries that were by Gilgal, and said, I have a secret errand unto thee, O king: who said, <text:span text:style-name="T11">Keep silence</text:span><text:span text:style-name="T39">.</text:span><text:span text:style-name="T9">H2013</text:span> And all that stood by him went out from him.</text:p>
            <text:p text:style-name="P14"/>
            <text:p text:style-name="P36">Nehemiah 8:11</text:p>
            <text:p text:style-name="P14">So the Levites stilled all the people, saying, <text:span text:style-name="T11">Hold your peace</text:span><text:span text:style-name="T39">,</text:span><text:span text:style-name="T9">H2013</text:span> for the day is holy; neither be ye grieved.</text:p>
            <text:p text:style-name="P14"/>
            <text:p text:style-name="P36">Amos 6:10</text:p>
            <text:p text:style-name="P14">And a man's uncle shall take him up, and he that burneth him, to bring out the bones out of the house, and shall say unto him that is by the sides of the house, Is there yet any with thee? and he shall say, No. Then shall he say, <text:span text:style-name="T11">Hold thy tongue</text:span><text:span text:style-name="T39">:</text:span><text:span text:style-name="T9">H2013</text:span> for we may not make mention of the name of the LORD.</text:p>
            <text:p text:style-name="P14"/>
            <text:p text:style-name="P36">Amos 8:3</text:p>
            <text:p text:style-name="P14">And the songs of the temple shall be howlings in that day, saith the Lord GOD: there shall be many dead bodies in every place; they shall cast them forth <text:span text:style-name="T11">with silence</text:span><text:span text:style-name="T39">.</text:span><text:span text:style-name="T9">H2013</text:span></text:p>
            <text:p text:style-name="P14"/>
            <text:p text:style-name="Table_20_Contents"><text:span text:style-name="T40">Zephaniah 1:7</text:span><text:span text:style-name="T41"> </text:span><text:span text:style-name="T42">(cf. </text:span><text:span text:style-name="T40">Matt. 22:1-14</text:span><text:span text:style-name="T42">)</text:span></text:p>
            <text:p text:style-name="P14"><text:span text:style-name="T11">Hold thy peace</text:span><text:span text:style-name="T9">H2013</text:span> at the presence of the Lord GOD: for the day of the LORD is at hand: for the LORD hath prepared a sacrifice, he hath bid his guests.</text:p>
            <text:p text:style-name="P14"/>
            <text:p text:style-name="P36">Zechariah 2:13</text:p>
            <text:p text:style-name="P14"><text:span text:style-name="T11">Be silent</text:span><text:span text:style-name="T39">,</text:span><text:span text:style-name="T9">H2013</text:span> O all flesh, before the LORD: for he is raised up out of his holy habitation.</text:p>
          </table:table-cell>
        </table:table-row>
      </table:table>
      <text:p text:style-name="P29"/>
      <text:p text:style-name="P29"/>
      <text:p text:style-name="P37">TSK cross-references</text:p>
      <table:table table:name="Table8" table:style-name="Table8">
        <table:table-column table:style-name="Table8.A"/>
        <table:table-row>
          <table:table-cell table:style-name="Table8.A1" office:value-type="string">
            <text:p text:style-name="P5">Psalms 11:4</text:p>
            <text:p text:style-name="P14">The LORD is in his holy temple, the LORD'S throne is in heaven: his eyes behold, his eyelids try, the children of men.</text:p>
            <text:p text:style-name="P14"/>
            <text:p text:style-name="P5">Psalms 115:3</text:p>
            <text:p text:style-name="P14">But our God is in the heavens: he hath done whatsoever he hath pleased.</text:p>
            <text:p text:style-name="P14"/>
            <text:p text:style-name="P5">Psalms 132:13-14</text:p>
            <text:p text:style-name="P14">For the LORD hath chosen Zion; he hath desired it for his habitation. This is my rest for ever: here will I dwell; for I have desired it.</text:p>
            <text:p text:style-name="P14"/>
            <text:p text:style-name="P5">Isaiah 6:1</text:p>
            <text:p text:style-name="P14">In the year that king Uzziah died I saw also the Lord sitting upon a throne, high and lifted up, and his train filled the temple.</text:p>
            <text:p text:style-name="P14"/>
            <text:p text:style-name="P5">Isaiah 66:1</text:p>
            <text:p text:style-name="P14">Thus saith the LORD, The heaven is my throne, and the earth is my footstool: where is the house that ye build unto me? and where is the place of my rest?</text:p>
            <text:p text:style-name="P14"/>
            <text:p text:style-name="P5">Isaiah 66:6</text:p>
            <text:p text:style-name="P14">A voice of noise from the city, a voice from the temple, a voice of the LORD that rendereth recompence to his enemies.</text:p>
            <text:p text:style-name="P14"/>
            <text:p text:style-name="P5">Jonah 2:4</text:p>
            <text:p text:style-name="P14">Then I said, I am cast out of thy sight; yet I will look again toward thy holy temple.</text:p>
            <text:p text:style-name="P14"/>
            <text:p text:style-name="P5">Jonah 2:7</text:p>
            <text:p text:style-name="P14">When my soul fainted within me I remembered the LORD: and my prayer came in unto thee, into thine holy temple.</text:p>
            <text:p text:style-name="P14"/>
            <text:p text:style-name="P5">Ephesians 2:21-22</text:p>
            <text:p text:style-name="P14">In whom all the building fitly framed together groweth unto an holy temple in the Lord: In whom ye also are builded together for an habitation of God through the Spirit.</text:p>
          </table:table-cell>
        </table:table-row>
        <table:table-row>
          <table:table-cell table:style-name="Table8.A2" office:value-type="string">
            <text:p text:style-name="P5">Psalms 46:10</text:p>
            <text:p text:style-name="P38">Be still, and know that I am God: I will be exalted among the heathen, I will be exalted in the earth.</text:p>
            <text:p text:style-name="P38"/>
            <text:p text:style-name="P5">Psalms 76:8-9</text:p>
            <text:p text:style-name="P38">Thou didst cause judgment to be heard from heaven; the earth feared, and was still, When God arose to judgment, to save all the meek of the earth. Selah.</text:p>
            <text:p text:style-name="P38"/>
            <text:p text:style-name="P5">Zephaniah 1:7</text:p>
            <text:p text:style-name="P38">Hold thy peace at the presence of the Lord GOD: for the day of the LORD is at hand: for the LORD hath prepared a sacrifice, he hath bid his guests.</text:p>
            <text:p text:style-name="P38"/>
            <text:p text:style-name="P5">Zechariah 2:13</text:p>
            <text:p text:style-name="P38">Be silent, O all flesh, before the LORD: for he is raised up out of his holy habitation.</text:p>
          </table:table-cell>
        </table:table-row>
      </table:table>
      <text:p text:style-name="P29"/>
      <text:p text:style-name="P39">Remember from our previous study on Hab. 3:19 <text:span text:style-name="T43">the context of the book of Habakkuk:</text:span></text:p>
      <text:p text:style-name="P40"/>
      <text:list text:style-name="L7">
        <text:list-item>
          <text:p text:style-name="P41"><text:span text:style-name="T44">Habakkuk finds out from God that the Babylonians (described by God as “terrible and dreadful” </text:span><text:span text:style-name="T40">Hab. 1:7</text:span><text:span text:style-name="T44">) are ordained by God for </text:span><text:span text:style-name="T45">the </text:span><text:span text:style-name="T44">judgment </text:span><text:span text:style-name="T45">and correction of Israel </text:span><text:span text:style-name="T44">and after Habakkuk learns of the terrible things to come, he writes a prayer in the form of a psalm about his confidence in God even in the midst of that most troubling news.</text:span></text:p>
        </text:list-item>
        <text:list-item>
          <text:p text:style-name="P42"><text:span text:style-name="T46">A</text:span><text:span text:style-name="T41"> basic outline of the </text:span><text:span text:style-name="T46">structure of the </text:span><text:span text:style-name="T41">book is:</text:span></text:p>
          <text:list>
            <text:list-item>
              <text:p text:style-name="P42"><text:span text:style-name="T41">Habakkuk’s question(s) </text:span><text:span text:style-name="T47">(1:1-4)</text:span></text:p>
            </text:list-item>
            <text:list-item>
              <text:p text:style-name="P42"><text:span text:style-name="T41">God’s response </text:span><text:span text:style-name="T47">(1:5-11)</text:span></text:p>
            </text:list-item>
            <text:list-item>
              <text:p text:style-name="P42"><text:span text:style-name="T41">Habakkuk’s question(s) </text:span><text:span text:style-name="T47">(1:12-2:1)</text:span></text:p>
            </text:list-item>
            <text:list-item>
              <text:p text:style-name="P42"><text:span text:style-name="T41">God’s response </text:span><text:span text:style-name="T47">(2:2-20)</text:span></text:p>
            </text:list-item>
            <text:list-item>
              <text:p text:style-name="P42"><text:span text:style-name="T41">Habakkuk’s prayer </text:span><text:span text:style-name="T47">(3:1-19)</text:span></text:p>
            </text:list-item>
          </text:list>
        </text:list-item>
        <text:list-item>
          <text:p text:style-name="P43"><text:span text:style-name="T44">I</text:span><text:span text:style-name="T41">n Habakkuk’s second petition to God, among other things, he respectfully asks God how He can allow such evil things to happen and wonders why </text:span><text:span text:style-name="T48">God </text:span><text:span text:style-name="T41">hasn’t done anything about it heretofore.</text:span></text:p>
        </text:list-item>
      </text:list>
      <text:p text:style-name="P44"><text:span text:style-name="T41"/></text:p>
      <table:table table:name="Table9" table:style-name="Table9">
        <table:table-column table:style-name="Table9.A"/>
        <table:table-row>
          <table:table-cell table:style-name="Table9.A1" office:value-type="string">
            <text:p text:style-name="Table_20_Contents"><text:span text:style-name="T49">WO</text:span><text:span text:style-name="T50">/</text:span><text:span text:style-name="T15">WO</text:span><text:span text:style-name="T51">E</text:span>, noun [G.]</text:p>
            <text:p text:style-name="Table_20_Contents"/>
            <text:p text:style-name="Table_20_Contents">1. Grief; sorrow; misery; a heavy calamity.</text:p>
            <text:p text:style-name="Table_20_Contents">2. A curse.</text:p>
            <text:p text:style-name="Table_20_Contents">3. wo<text:span text:style-name="T52">e</text:span> is used in denunciation, and in exclamations of sorrow.</text:p>
          </table:table-cell>
        </table:table-row>
        <table:table-row>
          <table:table-cell table:style-name="Table9.A2" office:value-type="string">
            <text:p text:style-name="Table_20_Contents"><text:span text:style-name="T15">DENUNCIATION</text:span>, noun</text:p>
            <text:p text:style-name="Table_20_Contents"/>
            <text:p text:style-name="Table_20_Contents">1. Publication; proclamation; annunciation; preaching; as a faithful denunciation of the gospel.</text:p>
            <text:p text:style-name="Table_20_Contents">2. Solemn or formal declaration, accompanied with a menace; or the declaration of intended evil; proclamation of a threat; a public menace; as a denunciation of war, or of wrath.</text:p>
          </table:table-cell>
        </table:table-row>
      </table:table>
      <text:p text:style-name="P44"><text:span text:style-name="T41"/></text:p>
      <text:p text:style-name="P44"><text:span text:style-name="T41">A brief summary of God’s second response up to verse 20 (</text:span><text:span text:style-name="T53">the </text:span><text:span text:style-name="T41">“but”):</text:span></text:p>
      <text:list text:style-name="L8">
        <text:list-item>
          <text:p text:style-name="P45">Note that the word “woe” appears five times (2:6, 2:9, 2:12, 2:15, 2:19)</text:p>
        </text:list-item>
        <text:list-item>
          <text:p text:style-name="P46"><text:span text:style-name="T41">Note also that carefully studying reveals that God is </text:span><text:span text:style-name="T54">very</text:span><text:span text:style-name="T41"> likely still talking about the Babylons (Chaldeans 1:6) (gathereth unto him all nations, because thou has spoiled many nations, for the violence of the land, graven images, molten images, speaking to idols)</text:span></text:p>
        </text:list-item>
        <text:list-item>
          <text:p text:style-name="P47"><text:span text:style-name="T41">(</text:span><text:span text:style-name="T55">2:2-4</text:span><text:span text:style-name="T41">) The LORD makes it clear that He is speaking about the future and </text:span><text:span text:style-name="T56">verse 4 ends</text:span><text:span text:style-name="T41"> with “the just shall live by his faith” </text:span><text:span text:style-name="T57">(</text:span><text:span text:style-name="T58">Rom. 1:17</text:span><text:span text:style-name="T57">, </text:span><text:span text:style-name="T58">Gal. 3:11</text:span><text:span text:style-name="T57">, </text:span><text:span text:style-name="T58">Heb. 10:38</text:span><text:span text:style-name="T57">)</text:span></text:p>
        </text:list-item>
        <text:list-item>
          <text:p text:style-name="P47"><text:span text:style-name="T41">(</text:span><text:span text:style-name="T55">2:5-</text:span><text:span text:style-name="T59">19</text:span><text:span text:style-name="T41">) </text:span><text:span text:style-name="T60">The LORD denounces many evils such as unrestrained desire (getting things at any cost including murder), taking things which are not rightfully your own (stealing, theft), murder and violence (men’s blood), </text:span><text:span text:style-name="T61">evil covetousness (strong desire or eagerness for things, taking comfort in them, feeling secure based on possessions), </text:span><text:span text:style-name="T62">lasciviousness, </text:span><text:span text:style-name="T56">and idolatr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27T12:03:02.782662176</meta:creation-date>
    <dc:date>2026-07-11T12:21:22.854251095</dc:date>
    <meta:editing-duration>PT3H38M57S</meta:editing-duration>
    <meta:editing-cycles>101</meta:editing-cycles>
    <meta:generator>LibreOffice/26.2.4.2$Linux_X86_64 LibreOffice_project/64a984c51f4702dbd3710b13428c673a2f1292e7</meta:generator>
    <meta:document-statistic meta:table-count="9" meta:image-count="0" meta:object-count="0" meta:page-count="5" meta:paragraph-count="109" meta:word-count="2033" meta:character-count="11021" meta:non-whitespace-character-count="9126"/>
  </office:meta>
</office:document-meta>
</file>