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7.9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7.9in" style:rel-column-width="65535*"/>
    </style:style>
    <style:style style:name="Table6.A1" style:family="table-cell">
      <style:table-cell-properties fo:padding="0.0382in" fo:border="0.5pt solid #000000"/>
    </style:style>
    <style:style style:name="P1" style:family="paragraph" style:parent-style-name="Table_20_Contents">
      <style:text-properties fo:color="#127622" loext:opacity="100%" officeooo:paragraph-rsid="00127cd2"/>
    </style:style>
    <style:style style:name="P2" style:family="paragraph" style:parent-style-name="Table_20_Contents">
      <style:text-properties officeooo:paragraph-rsid="00127cd2"/>
    </style:style>
    <style:style style:name="P3" style:family="paragraph" style:parent-style-name="Table_20_Contents">
      <style:text-properties officeooo:rsid="00127cd2" officeooo:paragraph-rsid="003477eb"/>
    </style:style>
    <style:style style:name="P4" style:family="paragraph" style:parent-style-name="Table_20_Contents">
      <style:text-properties officeooo:rsid="00127cd2" officeooo:paragraph-rsid="00127cd2"/>
    </style:style>
    <style:style style:name="P5" style:family="paragraph" style:parent-style-name="Table_20_Contents">
      <style:text-properties officeooo:rsid="001e7a41" officeooo:paragraph-rsid="001e7a41"/>
    </style:style>
    <style:style style:name="P6" style:family="paragraph" style:parent-style-name="Table_20_Contents">
      <style:text-properties officeooo:rsid="0023d7d7" officeooo:paragraph-rsid="0023d7d7"/>
    </style:style>
    <style:style style:name="P7" style:family="paragraph" style:parent-style-name="Table_20_Contents">
      <style:text-properties officeooo:rsid="00211083" officeooo:paragraph-rsid="00211083"/>
    </style:style>
    <style:style style:name="P8" style:family="paragraph" style:parent-style-name="Table_20_Contents">
      <style:text-properties officeooo:rsid="0014a3dc" officeooo:paragraph-rsid="0014a3dc"/>
    </style:style>
    <style:style style:name="P9" style:family="paragraph" style:parent-style-name="Table_20_Contents" style:list-style-name="L1">
      <style:text-properties officeooo:rsid="0014a3dc" officeooo:paragraph-rsid="0014a3dc"/>
    </style:style>
    <style:style style:name="P10" style:family="paragraph" style:parent-style-name="Table_20_Contents" style:list-style-name="L1">
      <style:text-properties officeooo:rsid="0015ed80" officeooo:paragraph-rsid="0015ed80"/>
    </style:style>
    <style:style style:name="P11" style:family="paragraph" style:parent-style-name="Table_20_Contents">
      <style:text-properties officeooo:rsid="001921ba" officeooo:paragraph-rsid="0015ed80"/>
    </style:style>
    <style:style style:name="P12" style:family="paragraph" style:parent-style-name="Table_20_Contents">
      <style:text-properties officeooo:rsid="001a7368" officeooo:paragraph-rsid="001a7368"/>
    </style:style>
    <style:style style:name="P13" style:family="paragraph" style:parent-style-name="Table_20_Contents">
      <style:text-properties officeooo:paragraph-rsid="001bb2a0"/>
    </style:style>
    <style:style style:name="P14" style:family="paragraph" style:parent-style-name="Table_20_Contents" style:list-style-name="L2">
      <style:text-properties officeooo:rsid="001a7368" officeooo:paragraph-rsid="001a7368"/>
    </style:style>
    <style:style style:name="P15" style:family="paragraph" style:parent-style-name="Table_20_Contents">
      <style:text-properties officeooo:rsid="00272bdf" officeooo:paragraph-rsid="00272bdf"/>
    </style:style>
    <style:style style:name="P16" style:family="paragraph" style:parent-style-name="Table_20_Contents">
      <style:text-properties officeooo:paragraph-rsid="0027a6f5"/>
    </style:style>
    <style:style style:name="P17" style:family="paragraph" style:parent-style-name="Table_20_Contents">
      <style:text-properties fo:color="#ff0000" loext:opacity="100%" officeooo:paragraph-rsid="0027a6f5"/>
    </style:style>
    <style:style style:name="P18" style:family="paragraph" style:parent-style-name="Table_20_Contents">
      <style:text-properties officeooo:paragraph-rsid="00449b17"/>
    </style:style>
    <style:style style:name="P19" style:family="paragraph" style:parent-style-name="Table_20_Contents">
      <style:text-properties fo:color="#ff0000" loext:opacity="100%" fo:background-color="transparent"/>
    </style:style>
    <style:style style:name="P20" style:family="paragraph" style:parent-style-name="Table_20_Contents">
      <style:text-properties fo:font-weight="normal" officeooo:rsid="0046b412" officeooo:paragraph-rsid="0032110e" style:font-weight-asian="normal" style:font-weight-complex="normal"/>
    </style:style>
    <style:style style:name="P21" style:family="paragraph" style:parent-style-name="Table_20_Contents">
      <style:text-properties officeooo:rsid="0032110e" officeooo:paragraph-rsid="0032110e"/>
    </style:style>
    <style:style style:name="P22" style:family="paragraph" style:parent-style-name="Table_20_Contents">
      <style:text-properties officeooo:rsid="00338b28" officeooo:paragraph-rsid="00338b28"/>
    </style:style>
    <style:style style:name="T1" style:family="text">
      <style:text-properties fo:color="#127622" loext:opacity="100%"/>
    </style:style>
    <style:style style:name="T2" style:family="text">
      <style:text-properties officeooo:rsid="00378785"/>
    </style:style>
    <style:style style:name="T3" style:family="text">
      <style:text-properties officeooo:rsid="00357b3f"/>
    </style:style>
    <style:style style:name="T4" style:family="text">
      <style:text-properties officeooo:rsid="0036236f"/>
    </style:style>
    <style:style style:name="T5" style:family="text">
      <style:text-properties officeooo:rsid="001ff640"/>
    </style:style>
    <style:style style:name="T6" style:family="text">
      <style:text-properties fo:background-color="#fff5ce" loext:char-shading-value="0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2023b" style:font-style-asian="normal" style:font-style-complex="normal"/>
    </style:style>
    <style:style style:name="T10" style:family="text">
      <style:text-properties fo:font-style="normal" officeooo:rsid="00257732" style:font-style-asian="normal" style:font-style-complex="normal"/>
    </style:style>
    <style:style style:name="T11" style:family="text">
      <style:text-properties fo:font-style="normal" officeooo:rsid="00393367" style:font-style-asian="normal" style:font-style-complex="normal"/>
    </style:style>
    <style:style style:name="T12" style:family="text">
      <style:text-properties fo:font-style="normal" officeooo:rsid="0039cca2" style:font-style-asian="normal" style:font-style-complex="normal"/>
    </style:style>
    <style:style style:name="T13" style:family="text">
      <style:text-properties fo:background-color="#ffffd7" loext:char-shading-value="0"/>
    </style:style>
    <style:style style:name="T14" style:family="text">
      <style:text-properties officeooo:rsid="0017541f"/>
    </style:style>
    <style:style style:name="T15" style:family="text">
      <style:text-properties officeooo:rsid="0015ed80"/>
    </style:style>
    <style:style style:name="T16" style:family="text">
      <style:text-properties officeooo:rsid="001921ba" fo:background-color="#fff5ce" loext:char-shading-value="0"/>
    </style:style>
    <style:style style:name="T17" style:family="text">
      <style:text-properties officeooo:rsid="001bd649"/>
    </style:style>
    <style:style style:name="T18" style:family="text">
      <style:text-properties fo:color="#127622" loext:opacity="100%" officeooo:rsid="001bd649"/>
    </style:style>
    <style:style style:name="T19" style:family="text">
      <style:text-properties officeooo:rsid="001d077f"/>
    </style:style>
    <style:style style:name="T20" style:family="text">
      <style:text-properties officeooo:rsid="002dc009"/>
    </style:style>
    <style:style style:name="T21" style:family="text">
      <style:text-properties officeooo:rsid="003dbc2e"/>
    </style:style>
    <style:style style:name="T22" style:family="text">
      <style:text-properties style:text-position="33% 80%"/>
    </style:style>
    <style:style style:name="T23" style:family="text">
      <style:text-properties fo:color="#ff0000" loext:opacity="100%"/>
    </style:style>
    <style:style style:name="T24" style:family="text">
      <style:text-properties fo:color="#ff0000" loext:opacity="100%" fo:background-color="#fff5ce" loext:char-shading-value="0"/>
    </style:style>
    <style:style style:name="T25" style:family="text">
      <style:text-properties officeooo:rsid="003efd5d"/>
    </style:style>
    <style:style style:name="T26" style:family="text">
      <style:text-properties officeooo:rsid="00428169"/>
    </style:style>
    <style:style style:name="T27" style:family="text">
      <style:text-properties officeooo:rsid="00401554"/>
    </style:style>
    <style:style style:name="T28" style:family="text">
      <style:text-properties officeooo:rsid="002f9c3d"/>
    </style:style>
    <style:style style:name="T29" style:family="text">
      <style:text-properties fo:background-color="#ffdbb6" loext:char-shading-value="0"/>
    </style:style>
    <style:style style:name="T30" style:family="text">
      <style:text-properties fo:color="#ff0000" loext:opacity="100%" fo:font-weight="bold" fo:background-color="#fff5ce" loext:char-shading-value="0" style:font-weight-asian="bold" style:font-weight-complex="bold"/>
    </style:style>
    <style:style style:name="T31" style:family="text">
      <style:text-properties fo:color="#ff0000" loext:opacity="100%" fo:background-color="transparent" loext:char-shading-value="0"/>
    </style:style>
    <style:style style:name="T32" style:family="text">
      <style:text-properties fo:color="#127622" loext:opacity="100%" fo:background-color="transparent" loext:char-shading-value="0"/>
    </style:style>
    <style:style style:name="T33" style:family="text">
      <style:text-properties officeooo:rsid="0041f0be"/>
    </style:style>
    <style:style style:name="T34" style:family="text">
      <style:text-properties officeooo:rsid="004bb7f2"/>
    </style:style>
    <style:style style:name="T3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1 John 5:8</text:p>
            <text:p text:style-name="P2">And there are three that bear witness in earth, the Spirit, and the water, and the blood: and these three agree in one.</text:p>
          </table:table-cell>
        </table:table-row>
      </table:table>
      <text:p text:style-name="Table_20_Contents"/>
      <text:p text:style-name="P3">I’ve seen a few arguments that assert that the “S” in “Spirit” in <text:span text:style-name="T1">1 John 5:8</text:span> should be <text:span text:style-name="T2">a </text:span>lowercase “<text:span text:style-name="T2">s” (as in “spirit”)</text:span>. None of them really made a lot of sense <text:span text:style-name="T3">to me </text:span>and <text:span text:style-name="T3">as you will see </text:span><text:span text:style-name="T4">straight from God’s word </text:span><text:span text:style-name="T3">that was for a good reason.</text:span></text:p>
      <text:p text:style-name="P4"/>
      <text:p text:style-name="P5">Like all truth, it’s nice and simple, <text:span text:style-name="T5">just one verse:</text:span></text:p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T1">Romans 8:16</text:span> (AV1769)<text:line-break/>The Spirit itself beareth witness <text:span text:style-name="T6">with</text:span> our spirit, that we are the children of God:</text:p>
            <text:p text:style-name="Table_20_Contents"/>
            <text:p text:style-name="P6"><text:span text:style-name="T1">Romans 8:16</text:span> (PCE)</text:p>
            <text:p text:style-name="Table_20_Contents">The Spirit itself beareth witness with our spirit, that we are the children of God:</text:p>
          </table:table-cell>
        </table:table-row>
      </table:table>
      <text:p text:style-name="P4"/>
      <text:p text:style-name="P7">If the Spirit of God bears witness <text:span text:style-name="T7">with</text:span><text:span text:style-name="T8"> our spirit then it must needs be in the same </text:span><text:span text:style-name="T9">location. </text:span><text:span text:style-name="T10">Where is our spirit? </text:span><text:span text:style-name="T11">Case closed. But, if you need more, here it is </text:span><text:span text:style-name="T12">from beginning to end</text:span><text:span text:style-name="T11">:</text:span></text:p>
      <text:p text:style-name="P8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pan text:style-name="T1">Genesis 2:7</text:span><text:line-break/>And the LORD God formed man of the <text:span text:style-name="T13">dust of the ground</text:span>, and breathed into his nostrils the <text:span text:style-name="T6">breath of life</text:span>; and man became a living soul.</text:p>
            <text:p text:style-name="Table_20_Contents"/>
            <text:p text:style-name="Table_20_Contents"><text:span text:style-name="T1">Ecclesiastes 12:7</text:span><text:line-break/>Then shall the <text:span text:style-name="T13">dust</text:span> return to the earth as it was: and the <text:span text:style-name="T6">spirit</text:span> shall return unto God who gave it.</text:p>
          </table:table-cell>
        </table:table-row>
      </table:table>
      <text:list text:style-name="L1">
        <text:list-item>
          <text:p text:style-name="P9"><text:span text:style-name="T14">The “dust (of the ground)”</text:span><text:span text:style-name="T15"> is our flesh.</text:span></text:p>
        </text:list-item>
        <text:list-item>
          <text:p text:style-name="P9"><text:span text:style-name="T14">The </text:span>“<text:span text:style-name="T15">breath of life” is our spirit.</text:span></text:p>
        </text:list-item>
        <text:list-item>
          <text:p text:style-name="P10">A man (or living soul) is the combination of the <text:span text:style-name="T13">flesh</text:span> and the <text:span text:style-name="T16">spirit</text:span> from God.</text:p>
        </text:list-item>
      </text:list>
      <text:p text:style-name="P11"/>
      <text:p text:style-name="P12"/>
      <text:p text:style-name="P12">Now, back to <text:span text:style-name="T1">Romans 8:16</text:span>: the Spirit that bears witness with our spirit, where is it? <text:span text:style-name="T17">Does it bear witness with our spirit from heaven (which is required if you change </text:span><text:span text:style-name="T18">1 John 5:8</text:span><text:span text:style-name="T17"> to be “spirit”)? Nay </text:span><text:span text:style-name="T19">it does not. </text:span><text:span text:style-name="T20">It’s the same Spirit that indwells all reborn believers in Christ. </text:span><text:span text:style-name="T21">But, that’s not all.</text:span></text:p>
      <text:p text:style-name="P12"/>
      <table:table table:name="Table4" table:style-name="Table4">
        <table:table-column table:style-name="Table4.A"/>
        <table:table-row>
          <table:table-cell table:style-name="Table4.A1" office:value-type="string">
            <text:p text:style-name="P13"><text:span text:style-name="T1">John 3:5-6</text:span><text:line-break/><text:span text:style-name="T22">5</text:span>Jesus answered, <text:span text:style-name="T23">Verily, verily, I say unto thee, </text:span><text:span text:style-name="T24">Except a man be born of water and of the Spirit, he cannot enter into the kingdom of God</text:span>.</text:p>
            <text:p text:style-name="P13"><text:span text:style-name="T22">6</text:span> <text:span text:style-name="T23">That which is born of the flesh is flesh; and that which is born of the </text:span><text:span text:style-name="T24">Spirit is spirit</text:span><text:span text:style-name="T23">.</text:span></text:p>
          </table:table-cell>
        </table:table-row>
      </table:table>
      <text:list text:style-name="L2">
        <text:list-item>
          <text:p text:style-name="P14"><text:span text:style-name="T25">The </text:span>“<text:span text:style-name="T25">Spirit” is also known as: the Spirit of God, Spirit of Christ, Holy Ghost, </text:span><text:span text:style-name="T26">and the </text:span><text:span text:style-name="T25">Holy Spirit.</text:span></text:p>
        </text:list-item>
      </text:list>
      <text:p text:style-name="P12"/>
      <text:p text:style-name="P15"><text:span text:style-name="T27">Now, what exactly</text:span> does the Spirit of God bear witness to? That we are the children of God. Does that apply to everyone? <text:span text:style-name="T28">Most assuredly not.</text:span></text:p>
      <text:p text:style-name="P15"/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16"><text:span text:style-name="T1">John 3:6-7</text:span><text:line-break/><text:span text:style-name="T22">6</text:span> <text:span text:style-name="T23">That which is born of the flesh is flesh; and that which is born of the Spirit is spirit.</text:span></text:p>
            <text:p text:style-name="P16"><text:span text:style-name="T22">7</text:span> <text:span text:style-name="T23">Marvel not that I said unto thee, </text:span><text:span text:style-name="T24">Ye must be born again</text:span><text:span text:style-name="T23">.</text:span></text:p>
            <text:p text:style-name="P17"/>
            <text:p text:style-name="P17"><text:span text:style-name="T1">John 8:44</text:span><text:line-break/><text:span text:style-name="T6">Ye are of your father </text:span><text:span text:style-name="T29">the devil</text:span>, and the lusts of your father ye will do. He was a murderer from the beginning, and abode not in the truth, because there is no truth in him. When he speaketh a lie, he speaketh of his own: for he is a liar, and the father of it.</text:p>
            <text:p text:style-name="Table_20_Contents"/>
            <text:p text:style-name="Table_20_Contents"><text:span text:style-name="T1">Romans 5:12</text:span><text:line-break/>Wherefore, as by one man sin entered into the world, and death by sin; and so <text:span text:style-name="T6">death passed upon all men, for that all have sinned:</text:span></text:p>
            <text:p text:style-name="Table_20_Contents"/>
            <text:p text:style-name="Table_20_Contents"><text:span text:style-name="T1">Ephesians 2:2</text:span><text:line-break/>Wherein in time past ye walked according to the course of this world, according to the <text:span text:style-name="T29">prince of the power of the air</text:span>, the spirit that now worketh in the <text:span text:style-name="T6">children of disobedience</text:span>:</text:p>
            <text:p text:style-name="Table_20_Contents"/>
            <text:p text:style-name="Table_20_Contents"><text:span text:style-name="T1">Ephesians 5:6</text:span><text:line-break/>Let no man deceive you with vain words: for because of these things <text:span text:style-name="T6">cometh the wrath of God upon the children of disobedience</text:span>.</text:p>
            <text:p text:style-name="Table_20_Contents"/>
            <text:p text:style-name="Table_20_Contents"><text:span text:style-name="T1">John 3:36</text:span><text:line-break/>He that believeth on the Son hath everlasting life: and he that believeth not the Son shall not see life; but <text:span text:style-name="T6">the wrath of God abideth on him</text:span>.</text:p>
            <text:p text:style-name="Table_20_Contents"/>
            <text:p text:style-name="Table_20_Contents"><text:span text:style-name="T1">John 1:12</text:span><text:line-break/>But as many as received him, to them gave he power to become <text:span text:style-name="T6">the sons of God</text:span>, even to them that believe on his name:</text:p>
            <text:p text:style-name="Table_20_Contents"/>
            <text:p text:style-name="Table_20_Contents"><text:span text:style-name="T1">Revelation 3:20</text:span><text:line-break/><text:span text:style-name="T23">Behold, I stand at the door, and knock: if any man hear my voice, and open the door, I will come in to him, and will sup with him, and he with me.</text:span></text:p>
            <text:p text:style-name="Table_20_Contents"/>
            <text:p text:style-name="P18"><text:span text:style-name="T1">John 15:4-6</text:span><text:line-break/><text:span text:style-name="T22">4</text:span> <text:span text:style-name="T23">Abide in me, and </text:span><text:span text:style-name="T24">I </text:span><text:span text:style-name="T30">in</text:span><text:span text:style-name="T24"> you</text:span><text:span text:style-name="T23">. As the branch cannot bear fruit of itself, except it abide in the vine; no more can ye, except ye abide in me.</text:span></text:p>
            <text:p text:style-name="P18"><text:span text:style-name="T22">5</text:span> <text:span text:style-name="T23">I am the vine, ye are the branches: He that abideth in me, and </text:span><text:span text:style-name="T24">I in him</text:span><text:span text:style-name="T23">, the same bringeth forth much fruit: for without me ye can do nothing.</text:span></text:p>
            <text:p text:style-name="Table_20_Contents"><text:span text:style-name="T22">6</text:span> <text:span text:style-name="T24">If a man abide not in me</text:span><text:span text:style-name="T23">, he is cast forth as a branch, and is withered; and men gather them, and cast them into the fire, and they are burned.</text:span></text:p>
            <text:p text:style-name="Table_20_Contents"/>
            <text:p text:style-name="Table_20_Contents"><text:span text:style-name="T1">John 14:17</text:span><text:line-break/><text:span text:style-name="T31">Even the Spirit of truth; whom the world cannot receive, because it seeth him not, neither knoweth him: but ye know him; for he dwelleth with you, and </text:span><text:span text:style-name="T24">shall be </text:span><text:span text:style-name="T30">in</text:span><text:span text:style-name="T24"> you</text:span><text:span text:style-name="T31">.</text:span></text:p>
            <text:p text:style-name="P19"/>
            <text:p text:style-name="Table_20_Contents"><text:span text:style-name="T32">John 10:30</text:span><text:span text:style-name="T31"><text:line-break/>I and my Father are one.</text:span></text:p>
            <text:p text:style-name="Table_20_Contents"/>
            <text:p text:style-name="Table_20_Contents"><text:span text:style-name="T1">John 14:10</text:span><text:line-break/><text:span text:style-name="T23">Believest thou not that </text:span><text:span text:style-name="T24">I am in the Father</text:span><text:span text:style-name="T23">, and </text:span><text:span text:style-name="T24">the Father in me</text:span><text:span text:style-name="T23">? the words that I speak unto you I speak not of myself: but </text:span><text:span text:style-name="T24">the Father that dwelleth in me</text:span><text:span text:style-name="T23">, he doeth the works.</text:span></text:p>
          </table:table-cell>
        </table:table-row>
      </table:table>
      <text:p text:style-name="P20"/>
      <table:table table:name="Table6" table:style-name="Table6">
        <table:table-column table:style-name="Table6.A"/>
        <text:soft-page-break/>
        <table:table-row>
          <table:table-cell table:style-name="Table6.A1" office:value-type="string">
            <text:p text:style-name="Table_20_Contents"><text:span text:style-name="T1">1 John 5:7</text:span><text:line-break/>For there are three that bear record in heaven, the Father, the Word, and the Holy Ghost: and <text:span text:style-name="T6">these three are one</text:span>.</text:p>
          </table:table-cell>
        </table:table-row>
      </table:table>
      <text:p text:style-name="P21"/>
      <text:p text:style-name="P22">Since God the Father, God the Son, and God the Spirit are all one and the Spirit of God (<text:span text:style-name="T33">AKA the</text:span> Holy Ghost <text:span text:style-name="T34">and the Spirit of Christ</text:span>) <text:span text:style-name="T34">is in heaven seated at the right hand of God and</text:span> also indwells those that are reborn here on earth: then <text:span text:style-name="T34">the word of God is clear: </text:span>the Spirit is both in heaven <text:span text:style-name="T35">and</text:span> in earth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padding="0.0201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9T14:20:42.303467100</meta:creation-date>
    <dc:title>default</dc:title>
    <meta:editing-duration>PT1H1M33S</meta:editing-duration>
    <meta:editing-cycles>59</meta:editing-cycles>
    <meta:generator>LibreOffice/25.8.1.1$Windows_X86_64 LibreOffice_project/54047653041915e595ad4e45cccea684809c77b5</meta:generator>
    <meta:initial-creator>William K. McDannell Jr.</meta:initial-creator>
    <dc:date>2025-09-29T15:22:43.455403500</dc:date>
    <dc:creator>William K. McDannell Jr.</dc:creator>
    <meta:print-date>2025-09-29T15:03:52.194984300</meta:print-date>
    <meta:printed-by>PDF files: William K. McDannell Jr.</meta:printed-by>
    <meta:document-statistic meta:table-count="6" meta:image-count="0" meta:object-count="0" meta:page-count="3" meta:paragraph-count="35" meta:word-count="935" meta:character-count="4631" meta:non-whitespace-character-count="3735"/>
    <meta:template xlink:type="simple" xlink:actuate="onRequest" xlink:title="default" xlink:href="../../../../../../../AppData/Roaming/LibreOffice/4/user/template/default.ott" meta:date="2025-09-29T14:20:41.370377500"/>
  </office:meta>
</office:document-meta>
</file>