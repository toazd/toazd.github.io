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-left="0.5pt solid #000000" fo:border-right="0.5pt solid #000000" fo:border-top="0.5pt solid #000000" fo:border-bottom="none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B1" style:family="table-cell">
      <style:table-cell-properties fo:padding="0.0382in" fo:border-left="0.5pt solid #000000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127622" loext:opacity="100%" style:font-name="Liberation Sans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ans1" fo:font-size="12pt" style:font-size-asian="12pt" style:font-size-complex="12pt"/>
    </style:style>
    <style:style style:name="P3" style:family="paragraph" style:parent-style-name="Standard">
      <style:text-properties style:font-name="Liberation Sans1" fo:font-size="12pt" officeooo:rsid="000406b6" officeooo:paragraph-rsid="000406b6" style:font-size-asian="12pt" style:font-size-complex="12pt"/>
    </style:style>
    <style:style style:name="P4" style:family="paragraph" style:parent-style-name="Standard">
      <style:text-properties fo:color="#127622" loext:opacity="100%" style:font-name="Liberation Sans1" fo:font-size="12pt" officeooo:rsid="000406b6" officeooo:paragraph-rsid="0005c159" style:font-size-asian="12pt" style:font-size-complex="12pt"/>
    </style:style>
    <style:style style:name="P5" style:family="paragraph" style:parent-style-name="Standard">
      <style:text-properties style:font-name="Liberation Sans1" fo:font-size="12pt" officeooo:rsid="000406b6" officeooo:paragraph-rsid="0005c159" style:font-size-asian="12pt" style:font-size-complex="12pt"/>
    </style:style>
    <style:style style:name="P6" style:family="paragraph" style:parent-style-name="Table_20_Contents">
      <style:text-properties fo:color="#127622" loext:opacity="100%" style:font-name="Liberation Sans1" fo:font-size="12pt" officeooo:rsid="000406b6" style:font-size-asian="12pt" style:font-size-complex="12pt"/>
    </style:style>
    <style:style style:name="P7" style:family="paragraph" style:parent-style-name="Table_20_Contents">
      <style:text-properties fo:color="#127622" loext:opacity="100%" style:font-name="Liberation Sans1" fo:font-size="12pt" officeooo:rsid="000406b6" officeooo:paragraph-rsid="0005c159" style:font-size-asian="12pt" style:font-size-complex="12pt"/>
    </style:style>
    <style:style style:name="P8" style:family="paragraph" style:parent-style-name="Table_20_Contents">
      <style:text-properties style:font-name="Liberation Sans1" fo:font-size="12pt" officeooo:paragraph-rsid="0005c159" style:font-size-asian="12pt" style:font-size-complex="12pt"/>
    </style:style>
    <style:style style:name="P9" style:family="paragraph" style:parent-style-name="Table_20_Contents">
      <style:text-properties style:font-name="Liberation Sans1" fo:font-size="12pt" style:font-size-asian="12pt" style:font-size-complex="12pt"/>
    </style:style>
    <style:style style:name="P10" style:family="paragraph" style:parent-style-name="Table_20_Contents">
      <style:text-properties fo:color="#c9211e" loext:opacity="100%" style:font-name="Liberation Sans1" fo:font-size="12pt" style:font-size-asian="12pt" style:font-size-complex="12pt"/>
    </style:style>
    <style:style style:name="P11" style:family="paragraph" style:parent-style-name="Standard">
      <style:text-properties style:font-name="Liberation Sans1" fo:font-size="12pt" officeooo:rsid="00111480" officeooo:paragraph-rsid="000406b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127622" loext:opacity="100%" style:font-name="Liberation Sans1" fo:font-size="12pt" officeooo:rsid="000406b6" officeooo:paragraph-rsid="0007960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2pt" officeooo:rsid="000406b6" officeooo:paragraph-rsid="00079601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127622" loext:opacity="100%" style:font-name="Liberation Sans1" fo:font-size="12pt" officeooo:rsid="000406b6" officeooo:paragraph-rsid="00079601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font-name="Liberation Sans1" fo:font-size="12pt" officeooo:rsid="000406b6" officeooo:paragraph-rsid="00079601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1" fo:font-size="12pt" officeooo:paragraph-rsid="000edb01" style:font-size-asian="12pt" style:font-size-complex="12pt"/>
    </style:style>
    <style:style style:name="P18" style:family="paragraph" style:parent-style-name="Standard">
      <style:text-properties style:font-name="Liberation Sans1" fo:font-size="12pt" officeooo:rsid="00079601" officeooo:paragraph-rsid="00079601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127622" loext:opacity="100%" style:font-name="Liberation Sans1" fo:font-size="12pt" officeooo:rsid="000406b6" officeooo:paragraph-rsid="00079601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fo:font-size="12pt" officeooo:rsid="00079601" officeooo:paragraph-rsid="00079601" style:font-size-asian="12pt" style:font-size-complex="12pt"/>
    </style:style>
    <style:style style:name="P21" style:family="paragraph" style:parent-style-name="Standard">
      <style:text-properties fo:color="#127622" loext:opacity="100%" style:font-name="Liberation Sans1" fo:font-size="12pt" officeooo:rsid="000406b6" officeooo:paragraph-rsid="00079601" style:font-size-asian="12pt" style:font-size-complex="12pt"/>
    </style:style>
    <style:style style:name="P22" style:family="paragraph" style:parent-style-name="Standard">
      <style:text-properties style:font-name="Liberation Sans1" fo:font-size="12pt" officeooo:paragraph-rsid="00079601" style:font-size-asian="12pt" style:font-size-complex="12pt"/>
    </style:style>
    <style:style style:name="P23" style:family="paragraph" style:parent-style-name="Table_20_Contents">
      <style:text-properties style:font-name="Liberation Sans1" fo:font-size="12pt" officeooo:rsid="00079601" officeooo:paragraph-rsid="00079601" style:font-size-asian="12pt" style:font-size-complex="12pt"/>
    </style:style>
    <style:style style:name="T1" style:family="text">
      <style:text-properties officeooo:rsid="00040a42"/>
    </style:style>
    <style:style style:name="T2" style:family="text">
      <style:text-properties fo:color="#127622" loext:opacity="100%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fo:color="#127622" loext:opacity="100%" style:font-name="Liberation Sans1" fo:font-size="12pt" officeooo:rsid="000406b6" style:font-size-asian="12pt" style:font-size-complex="12pt"/>
    </style:style>
    <style:style style:name="T5" style:family="text">
      <style:text-properties style:font-name="Liberation Sans1" fo:font-size="12pt" fo:background-color="#ffff00" loext:char-shading-value="0" style:font-size-asian="12pt" style:font-size-complex="12pt"/>
    </style:style>
    <style:style style:name="T6" style:family="text">
      <style:text-properties fo:background-color="#ffff00" loext:char-shading-value="0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officeooo:rsid="000b9821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79601"/>
    </style:style>
    <style:style style:name="T11" style:family="text">
      <style:text-properties style:text-underline-style="solid" style:text-underline-width="auto" style:text-underline-color="font-color" officeooo:rsid="00079601"/>
    </style:style>
    <style:style style:name="T12" style:family="text">
      <style:text-properties officeooo:rsid="000edb01"/>
    </style:style>
    <style:style style:name="T13" style:family="text">
      <style:text-properties fo:background-color="#ffb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John 5:12</text:p>
      <text:p text:style-name="P2">He that hath the Son hath life; and he that hath not the Son of God hath not life.</text:p>
      <text:p text:style-name="P2"/>
      <text:p text:style-name="P3"><text:span text:style-name="T1">Read </text:span><text:span text:style-name="T2">I John 4:7-5:13</text:span>.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1 John 4:15</text:p>
            <text:p text:style-name="P5">Whosoever shall confess that Jesus is the Son of God, God dwelleth in him, and he in God.</text:p>
          </table:table-cell>
        </table:table-row>
        <table:table-row>
          <table:table-cell table:style-name="Table2.A2" office:value-type="string">
            <text:p text:style-name="P6">Acts 8:26-40</text:p>
            <text:p text:style-name="Table_20_Contents"><text:span text:style-name="T3">And the angel of the Lord spake unto Philip, saying, Arise, and go toward the south unto the way that goeth down from Jerusalem unto Gaza, which is desert. [</text:span><text:span text:style-name="T4">27</text:span><text:span text:style-name="T3">] And he arose and went: and, behold, a man of Ethiopia, an eunuch of great authority under Candace queen of the Ethiopians, who had the charge of all her treasure, and had come to Jerusalem for to worship, [</text:span><text:span text:style-name="T4">28</text:span><text:span text:style-name="T3">] Was returning, and sitting in his chariot read Esaias the prophet. [</text:span><text:span text:style-name="T4">29</text:span><text:span text:style-name="T3">] Then the Spirit said unto Philip, Go near, and join thyself to this chariot. [</text:span><text:span text:style-name="T4">30</text:span><text:span text:style-name="T3">] And Philip ran thither to him, and heard him read the prophet Esaias, and said, Understandest thou what thou readest? [</text:span><text:span text:style-name="T4">31</text:span><text:span text:style-name="T3">] And he said, How can I, except some man should guide me? And he desired Philip that he would come up and sit with him. [</text:span><text:span text:style-name="T4">32</text:span><text:span text:style-name="T3">] The place of the scripture which he read was this, He was led as a sheep to the slaughter; and like a lamb dumb before his shearer, so opened he not his mouth: [</text:span><text:span text:style-name="T4">33</text:span><text:span text:style-name="T3">] In his humiliation his judgment was taken away: and who shall declare his generation? for his life is taken from the earth. [</text:span><text:span text:style-name="T4">34</text:span><text:span text:style-name="T3">] And the eunuch answered Philip, and said, I pray thee, of whom speaketh the prophet this? of himself, or of some other man? [</text:span><text:span text:style-name="T4">35</text:span><text:span text:style-name="T3">] Then Philip opened his mouth, and began at the same scripture, and preached unto him Jesus. [</text:span><text:span text:style-name="T4">36</text:span><text:span text:style-name="T3">] And as they went on their way, they came unto a certain water: and the eunuch said, See, here is water; what doth hinder me to be baptized? [</text:span><text:span text:style-name="T4">37</text:span><text:span text:style-name="T3">] And Philip said, </text:span><text:span text:style-name="T5">If thou believest with all thine heart</text:span><text:span text:style-name="T3">, thou mayest. And he answered </text:span><text:span text:style-name="T5">and said, I believe that Jesus Christ is the Son of God</text:span><text:span text:style-name="T3">. [</text:span><text:span text:style-name="T4">38</text:span><text:span text:style-name="T3">] And he commanded the chariot to stand still: and they went down both into the water, both Philip and the eunuch; and he baptized him. [</text:span><text:span text:style-name="T4">39</text:span><text:span text:style-name="T3">] And when they were come up out of the water, the Spirit of the Lord caught away Philip, that the eunuch saw him no more: and he went on his way rejoicing. [</text:span><text:span text:style-name="T4">40</text:span><text:span text:style-name="T3">] But Philip was found at Azotus: and passing through he preached in all the cities, till he came to Caesarea.</text:span></text:p>
          </table:table-cell>
        </table:table-row>
        <table:table-row>
          <table:table-cell table:style-name="Table2.A2" office:value-type="string">
            <text:p text:style-name="Table_20_Contents"><text:span text:style-name="T4">Romans</text:span><text:span text:style-name="T3"> </text:span><text:span text:style-name="T4">10:9-10</text:span></text:p>
            <text:p text:style-name="Table_20_Contents"><text:span text:style-name="T3">That if thou shalt </text:span><text:span text:style-name="T5">confess with thy mouth the Lord Jesus</text:span><text:span text:style-name="T3">, and shalt </text:span><text:span text:style-name="T5">believe in thine heart that God hath raised him from the dead</text:span><text:span text:style-name="T3">, thou shalt be saved. [</text:span><text:span text:style-name="T4">10</text:span><text:span text:style-name="T3">] For with the heart man believeth unto righteousness; and with the mouth confession is made unto salvation.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1 John 5:1</text:p>
            <text:p text:style-name="P8">Whosoever believeth that Jesus is the Christ is born of God: and every one that loveth him that begat loveth him also that is begotten of him.</text:p>
          </table:table-cell>
        </table:table-row>
        <table:table-row>
          <table:table-cell table:style-name="Table4.A2" office:value-type="string">
            <text:p text:style-name="P6">John 1:12-13</text:p>
            <text:p text:style-name="Table_20_Contents"><text:span text:style-name="T3">But as many as received him, to them gave he power to become the sons of God, even to </text:span><text:span text:style-name="T5">them that believe on his name</text:span><text:span text:style-name="T3">: [</text:span><text:span text:style-name="T4">13</text:span><text:span text:style-name="T3">] Which were </text:span><text:span text:style-name="T5">born</text:span><text:span text:style-name="T3">, not of blood, nor of the will of the flesh, nor of the will of man, but </text:span><text:span text:style-name="T5">of God</text:span><text:span text:style-name="T3">.</text:span></text:p>
          </table:table-cell>
        </table:table-row>
      </table:table>
      <text:p text:style-name="P3"/>
      <text:p text:style-name="P3"/>
      <text:p text:style-name="P3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6">1 John 5:10</text:p>
            <text:p text:style-name="P9">He that believeth on the Son of God <text:span text:style-name="T6">hath the witness in himself</text:span>: he that believeth not God hath made him a liar; because he believeth not the record that God gave of his Son.</text:p>
          </table:table-cell>
        </table:table-row>
        <table:table-row>
          <table:table-cell table:style-name="Table1.A2" office:value-type="string">
            <text:p text:style-name="P6">John 3:18<text:span text:style-name="T7"> </text:span><text:span text:style-name="T8">(</text:span><text:span text:style-name="T7">1 Thessalonians 1:10</text:span><text:span text:style-name="T8">)</text:span></text:p>
            <text:p text:style-name="P10">He that believeth on him is not condemned: but he that believeth not is condemned already, because he hath not believed in the name of the only begotten Son of God.</text:p>
          </table:table-cell>
        </table:table-row>
        <table:table-row>
          <table:table-cell table:style-name="Table1.A2" office:value-type="string">
            <text:p text:style-name="P6">John 3:36</text:p>
            <text:p text:style-name="P9">He that believeth on the Son hath <text:span text:style-name="T6">everlasting life</text:span>: and he that believeth not the Son shall not <text:span text:style-name="T9">see </text:span><text:span text:style-name="T6">life</text:span>; but the wrath of God abideth on him.</text:p>
          </table:table-cell>
        </table:table-row>
      </table:table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1 John 5:7</text:p>
            <text:p text:style-name="P13">For there are three <text:span text:style-name="T6">that bear record in</text:span> heaven, the Father, the Word, and the Holy Ghost: and these three are one.</text:p>
          </table:table-cell>
          <table:table-cell table:style-name="Table3.B1" office:value-type="string">
            <text:p text:style-name="P14">...<text:span text:style-name="T10">that bear </text:span><text:span text:style-name="T11">record</text:span><text:span text:style-name="T10"> in...</text:span></text:p>
          </table:table-cell>
        </table:table-row>
        <table:table-row>
          <table:table-cell table:style-name="Table3.A2" office:value-type="string">
            <text:p text:style-name="P15">1 John 5:8</text:p>
            <text:p text:style-name="P16">And there are three <text:span text:style-name="T6">that bear witness in</text:span> earth, the Spirit, and the water, and the blood: and these three agree in one.</text:p>
          </table:table-cell>
          <table:table-cell table:style-name="Table3.B2" office:value-type="string">
            <text:p text:style-name="P14">...<text:span text:style-name="T10">that bear </text:span><text:span text:style-name="T11">witness</text:span><text:span text:style-name="T10"> in...</text:span></text:p>
          </table:table-cell>
        </table:table-row>
        <table:table-row>
          <table:table-cell table:style-name="Table3.A3" office:value-type="string">
            <text:p text:style-name="P6">1 John 5:11</text:p>
            <text:p text:style-name="P9">And this is the record, that God hath given to us <text:span text:style-name="T6">eternal life</text:span>, and this <text:span text:style-name="T6">life</text:span> is in his Son.</text:p>
          </table:table-cell>
          <table:table-cell table:style-name="Table3.B2" office:value-type="string">
            <text:p text:style-name="P17">And this is the <text:span text:style-name="T12">[witness]</text:span>, that God hath given to us <text:span text:style-name="T6">eternal life</text:span>, and this <text:span text:style-name="T6">life</text:span> is in his Son.</text:p>
          </table:table-cell>
        </table:table-row>
      </table:table>
      <text:p text:style-name="P18"/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I John 5:12</text:p>
          </table:table-cell>
          <table:table-cell table:style-name="Table5.B1" office:value-type="string">
            <text:p text:style-name="P20">[eternal] life [in Jesus Christ]</text:p>
          </table:table-cell>
        </table:table-row>
        <table:table-row>
          <table:table-cell table:style-name="Table5.A2" office:value-type="string">
            <text:p text:style-name="P21">1 John 5:12</text:p>
            <text:p text:style-name="P22">He that hath the <text:span text:style-name="T13">Son</text:span> hath <text:span text:style-name="T6">life</text:span>; and he that hath not the <text:span text:style-name="T13">Son of God</text:span> hath not <text:span text:style-name="T6">life</text:span>.</text:p>
          </table:table-cell>
          <table:table-cell table:style-name="Table5.B2" office:value-type="string">
            <text:p text:style-name="P23">He that hath [<text:span text:style-name="T13">Jesus Christ</text:span>] hath [<text:span text:style-name="T6">eternal</text:span>] life; and he that hath not [<text:span text:style-name="T13">Jesus Christ</text:span>] hath not [<text:span text:style-name="T6">eternal</text:span>] life.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25T12:44:47.704135113</meta:creation-date>
    <dc:date>2023-11-25T13:21:08.029242182</dc:date>
    <meta:editing-duration>PT32M17S</meta:editing-duration>
    <meta:editing-cycles>16</meta:editing-cycles>
    <meta:generator>LibreOffice/25.2.4.3$Linux_X86_64 LibreOffice_project/520$Build-3</meta:generator>
    <meta:document-statistic meta:table-count="5" meta:image-count="0" meta:object-count="0" meta:page-count="2" meta:paragraph-count="33" meta:word-count="810" meta:character-count="4156" meta:non-whitespace-character-count="3379"/>
  </office:meta>
</office:document-meta>
</file>