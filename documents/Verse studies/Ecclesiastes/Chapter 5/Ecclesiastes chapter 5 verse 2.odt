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Standard">
      <style:text-properties fo:color="#127622" loext:opacity="100%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Table_20_Contents">
      <style:text-properties fo:color="#127622" loext:opacity="100%" fo:font-size="13pt" style:font-size-asian="13pt" style:font-size-complex="13pt"/>
    </style:style>
    <style:style style:name="P4" style:family="paragraph" style:parent-style-name="Table_20_Contents">
      <style:text-properties fo:font-size="13pt" officeooo:paragraph-rsid="0015a9cc" style:font-size-asian="13pt" style:font-size-complex="13pt"/>
    </style:style>
    <style:style style:name="P5" style:family="paragraph" style:parent-style-name="Standard" style:list-style-name="L1">
      <style:text-properties fo:font-size="13pt" officeooo:rsid="001e9ba8" officeooo:paragraph-rsid="001e9ba8" style:font-size-asian="13pt" style:font-size-complex="13pt"/>
    </style:style>
    <style:style style:name="P6" style:family="paragraph" style:parent-style-name="Standard">
      <style:text-properties fo:font-size="13pt" officeooo:rsid="001e9ba8" officeooo:paragraph-rsid="001e9ba8" style:font-size-asian="13pt" style:font-size-complex="13pt"/>
    </style:style>
    <style:style style:name="P7" style:family="paragraph" style:parent-style-name="Table_20_Contents">
      <style:text-properties fo:font-size="13pt" style:font-size-asian="13pt" style:font-size-complex="13pt"/>
    </style:style>
    <style:style style:name="P8" style:family="paragraph" style:parent-style-name="Table_20_Contents">
      <style:text-properties fo:font-size="13pt" officeooo:paragraph-rsid="0016be51" style:font-size-asian="13pt" style:font-size-complex="13pt"/>
    </style:style>
    <style:style style:name="P9" style:family="paragraph" style:parent-style-name="Standard" style:list-style-name="L2">
      <style:text-properties fo:font-size="13pt" officeooo:rsid="002968e9" officeooo:paragraph-rsid="002968e9" style:font-size-asian="13pt" style:font-size-complex="13pt"/>
    </style:style>
    <style:style style:name="P10" style:family="paragraph" style:parent-style-name="Standard">
      <style:text-properties fo:font-size="13pt" officeooo:rsid="002968e9" officeooo:paragraph-rsid="002968e9" style:font-size-asian="13pt" style:font-size-complex="13pt"/>
    </style:style>
    <style:style style:name="P11" style:family="paragraph" style:parent-style-name="Standard" style:list-style-name="L3">
      <style:text-properties fo:font-size="13pt" officeooo:rsid="0029c88b" officeooo:paragraph-rsid="0029c88b" style:font-size-asian="13pt" style:font-size-complex="13pt"/>
    </style:style>
    <style:style style:name="P12" style:family="paragraph" style:parent-style-name="Standard">
      <style:text-properties fo:font-size="13pt" officeooo:rsid="0039f65c" officeooo:paragraph-rsid="0039f65c" style:font-size-asian="13pt" style:font-size-complex="13pt"/>
    </style:style>
    <style:style style:name="P13" style:family="paragraph" style:parent-style-name="Table_20_Contents">
      <style:text-properties officeooo:paragraph-rsid="0018e9f2"/>
    </style:style>
    <style:style style:name="P14" style:family="paragraph" style:parent-style-name="Standard" style:list-style-name="L4">
      <style:text-properties fo:font-size="13pt" officeooo:rsid="0024cf35" officeooo:paragraph-rsid="002f4215" style:font-size-asian="13pt" style:font-size-complex="13pt"/>
    </style:style>
    <style:style style:name="P15" style:family="paragraph" style:parent-style-name="Standard" style:list-style-name="L4">
      <style:text-properties fo:font-size="13pt" officeooo:rsid="002c2974" officeooo:paragraph-rsid="002f4215" style:font-size-asian="13pt" style:font-size-complex="13pt"/>
    </style:style>
    <style:style style:name="P16" style:family="paragraph" style:parent-style-name="Table_20_Contents">
      <style:text-properties officeooo:paragraph-rsid="001b40b9"/>
    </style:style>
    <style:style style:name="P17" style:family="paragraph" style:parent-style-name="Standard" style:list-style-name="L5">
      <style:text-properties fo:font-size="13pt" officeooo:rsid="0024cf35" officeooo:paragraph-rsid="0024cf35" style:font-size-asian="13pt" style:font-size-complex="13pt"/>
    </style:style>
    <style:style style:name="P18" style:family="paragraph" style:parent-style-name="Standard" style:list-style-name="L5">
      <style:text-properties fo:font-size="13pt" officeooo:rsid="002656dd" officeooo:paragraph-rsid="002656dd" style:font-size-asian="13pt" style:font-size-complex="13pt"/>
    </style:style>
    <style:style style:name="P19" style:family="paragraph" style:parent-style-name="Standard" style:list-style-name="L5">
      <style:text-properties fo:font-size="13pt" officeooo:rsid="002656dd" officeooo:paragraph-rsid="00287583" style:font-size-asian="13pt" style:font-size-complex="13pt"/>
    </style:style>
    <style:style style:name="P20" style:family="paragraph" style:parent-style-name="Standard">
      <style:text-properties fo:font-size="13pt" officeooo:rsid="002656dd" officeooo:paragraph-rsid="002656dd" style:font-size-asian="13pt" style:font-size-complex="13pt"/>
    </style:style>
    <style:style style:name="T1" style:family="text">
      <style:text-properties officeooo:rsid="0015a9cc"/>
    </style:style>
    <style:style style:name="T2" style:family="text">
      <style:text-properties fo:color="#127622" loext:opacity="100%"/>
    </style:style>
    <style:style style:name="T3" style:family="text">
      <style:text-properties fo:background-color="#ffffd7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6be51"/>
    </style:style>
    <style:style style:name="T7" style:family="text">
      <style:text-properties officeooo:rsid="0029e015"/>
    </style:style>
    <style:style style:name="T8" style:family="text">
      <style:text-properties fo:font-size="13pt" officeooo:rsid="0018e9f2" style:font-size-asian="13pt" style:font-size-complex="13pt"/>
    </style:style>
    <style:style style:name="T9" style:family="text">
      <style:text-properties fo:color="#127622" loext:opacity="100%" fo:font-size="13pt" style:font-size-asian="13pt" style:font-size-complex="13pt"/>
    </style:style>
    <style:style style:name="T10" style:family="text">
      <style:text-properties fo:color="#ff0000" loext:opacity="100%" fo:font-size="13pt" style:font-size-asian="13pt" style:font-size-complex="13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ff0000" loext:opacity="100%" fo:font-size="13pt" fo:background-color="#ffff00" loext:char-shading-value="0" style:font-size-asian="13pt" style:font-size-complex="13pt"/>
    </style:style>
    <style:style style:name="T13" style:family="text">
      <style:text-properties officeooo:rsid="002a5e35"/>
    </style:style>
    <style:style style:name="T14" style:family="text">
      <style:text-properties fo:color="#127622" loext:opacity="100%" officeooo:rsid="002c2974"/>
    </style:style>
    <style:style style:name="T15" style:family="text">
      <style:text-properties fo:color="#127622" loext:opacity="100%" officeooo:rsid="002e2658"/>
    </style:style>
    <style:style style:name="T16" style:family="text">
      <style:text-properties style:use-window-font-color="true" loext:opacity="0%" officeooo:rsid="002c2974"/>
    </style:style>
    <style:style style:name="T17" style:family="text">
      <style:text-properties fo:font-size="13pt" officeooo:rsid="001b40b9" style:font-size-asian="13pt" style:font-size-complex="13pt"/>
    </style:style>
    <style:style style:name="T18" style:family="text">
      <style:text-properties officeooo:rsid="0030bb32"/>
    </style:style>
    <style:style style:name="T19" style:family="text">
      <style:text-properties officeooo:rsid="00362dc1"/>
    </style:style>
    <style:style style:name="T20" style:family="text">
      <style:text-properties officeooo:rsid="002ff46a"/>
    </style:style>
    <style:style style:name="T21" style:family="text">
      <style:text-properties officeooo:rsid="00260685"/>
    </style:style>
    <style:style style:name="T22" style:family="text">
      <style:text-properties fo:color="#127622" loext:opacity="100%" officeooo:rsid="00260685"/>
    </style:style>
    <style:style style:name="T23" style:family="text">
      <style:text-properties style:use-window-font-color="true" loext:opacity="0%" officeooo:rsid="00260685"/>
    </style:style>
    <style:style style:name="T24" style:family="text">
      <style:text-properties fo:color="#127622" loext:opacity="100%" officeooo:rsid="003255bd"/>
    </style:style>
    <style:style style:name="T25" style:family="text">
      <style:text-properties style:use-window-font-color="true" loext:opacity="0%" officeooo:rsid="003255b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381757"/>
    </style:style>
    <style:style style:name="T28" style:family="text">
      <style:text-properties officeooo:rsid="0027d130"/>
    </style:style>
    <style:style style:name="T29" style:family="text">
      <style:text-properties style:use-window-font-color="true" loext:opacity="0%"/>
    </style:style>
    <style:style style:name="T30" style:family="text">
      <style:text-properties fo:background-color="#fff5ce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clesiastes 5:2</text:p>
      <text:p text:style-name="P2">Be not rash with thy mouth, and let not thine heart be hasty to utter any thing before God: for God is in heaven, and thou upon earth: therefore let thy words be few.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Ecclesiastes 5:1-7</text:p>
            <text:p text:style-name="P4"><text:span text:style-name="T1">[</text:span><text:span text:style-name="T2">1</text:span><text:span text:style-name="T1">] </text:span>Keep thy foot when thou goest to the house of God, and be more ready to hear, than to give the sacrifice of fools: for they consider not that they do evil.</text:p>
            <text:p text:style-name="P4">[<text:span text:style-name="T2">2</text:span>] <text:span text:style-name="T3">Be not rash with thy mouth, and let not thine heart be hasty to utter any thing before God: for God is in heaven, and thou upon earth: therefore let thy words be few.</text:span></text:p>
            <text:p text:style-name="P4">[<text:span text:style-name="T2">3</text:span>] For a dream cometh through the multitude of business; and a fool's voice is known by multitude of words.</text:p>
            <text:p text:style-name="P4">[<text:span text:style-name="T2">4</text:span>] When thou vowest a vow unto God, defer not to pay it; for he hath no pleasure in fools: pay that which thou hast vowed.</text:p>
            <text:p text:style-name="P4">[<text:span text:style-name="T2">5</text:span>] Better is it that thou shouldest not vow, than that thou shouldest vow and not pay.</text:p>
            <text:p text:style-name="P4">[<text:span text:style-name="T2">6</text:span>] Suffer not thy mouth to cause thy flesh to sin; neither say thou before the angel, that it was an error: wherefore should God be angry at thy voice, and destroy the work of thine hands?</text:p>
            <text:p text:style-name="P4">[<text:span text:style-name="T2">7</text:span>] For in the multitude of dreams and many words there are also divers vanities: but fear thou God.</text:p>
          </table:table-cell>
        </table:table-row>
      </table:table>
      <text:p text:style-name="P2"/>
      <text:list text:style-name="L1">
        <text:list-item>
          <text:p text:style-name="P5">The context is vows to God.</text:p>
        </text:list-item>
      </text:list>
      <text:p text:style-name="P6"/>
      <table:table table:name="Table7" table:style-name="Table7">
        <table:table-column table:style-name="Table7.A"/>
        <table:table-row>
          <table:table-cell table:style-name="Table7.A1" office:value-type="string">
            <text:p text:style-name="P7"><text:span text:style-name="T4">VOW</text:span>, noun</text:p>
            <text:p text:style-name="P7"><text:span text:style-name="T4">1</text:span>. <text:span text:style-name="T5">A solemn promise made to God</text:span>, or by a pagan to his deity.</text:p>
          </table:table-cell>
        </table:table-row>
      </table:table>
      <text:p text:style-name="P6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<text:span text:style-name="T4">RASH</text:span>, adjective</text:p>
            <text:p text:style-name="P7"><text:span text:style-name="T4">1</text:span>. <text:span text:style-name="T5">Hasty in</text:span> council or <text:span text:style-name="T5">action</text:span>; precipitate; resolving or entering on a project or measure without due deliberation and caution, and thus encountering unnecessary hazard; applied to persons; as a rash statesman or minister; a rash commander.</text:p>
            <text:p text:style-name="P7"><text:span text:style-name="T4">2</text:span>. <text:span text:style-name="T5">Uttered</text:span> or undertaken <text:span text:style-name="T5">with too much haste or too little reflection</text:span>; as rash words; rash measures.</text:p>
            <text:p text:style-name="P7"><text:span text:style-name="T4">3</text:span>. Requiring haste; urgent.</text:p>
            <text:p text:style-name="P7"><text:span text:style-name="T4">4</text:span>. Quick; sudden; as rash gunpowder.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Deuteronomy 23:21-23</text:p>
            <text:p text:style-name="P8"><text:span text:style-name="T6">[</text:span><text:span text:style-name="T2">21</text:span><text:span text:style-name="T6">] </text:span>When thou shalt vow a vow unto the LORD thy God, <text:span text:style-name="T5">thou shalt not slack to pay it</text:span>: for the LORD thy God will surely require it of thee; <text:span text:style-name="T5">and it would be sin in thee</text:span>.</text:p>
            <text:p text:style-name="P8">[<text:span text:style-name="T2">22</text:span>] But if thou shalt forbear to vow, it shall be no sin in thee.</text:p>
            <text:p text:style-name="P8">[<text:span text:style-name="T2">23</text:span>] That which is gone out of thy lips thou shalt keep and perform; even a freewill offering, according as thou hast vowed unto the LORD thy God, which thou hast promised with thy mouth.</text:p>
          </table:table-cell>
        </table:table-row>
      </table:table>
      <text:p text:style-name="P2"/>
      <text:list text:style-name="L2">
        <text:list-item>
          <text:p text:style-name="P9">Numbers chapter 30 also includes more details about the conditions of vows.</text:p>
        </text:list-item>
      </text:list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Proverbs 20:25</text:p>
            <text:p text:style-name="P7"><text:span text:style-name="T5">It is a snare to the man who</text:span> devoureth that which is holy, and <text:span text:style-name="T5">after vows to make enquiry</text:span>.</text:p>
          </table:table-cell>
        </table:table-row>
      </table:table>
      <text:list text:style-name="L3">
        <text:list-header>
          <text:p text:style-name="P11"/>
        </text:list-header>
        <text:list-item>
          <text:p text:style-name="P11">Changing your mind about or reconsidering <text:span text:style-name="T7">a</text:span> vow after making <text:span text:style-name="T7">it </text:span>is a snare.</text:p>
        </text:list-item>
      </text:list>
      <text:p text:style-name="P2"/>
      <text:p text:style-name="P12"><text:soft-page-break/>Extra</text:p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Matthew 5:33-37</text:p>
            <text:p text:style-name="P13"><text:span text:style-name="T8">[</text:span><text:span text:style-name="T9">33</text:span><text:span text:style-name="T8">] </text:span><text:span text:style-name="T10">Again, ye have heard that it hath been said by them of old time, Thou shalt not forswear thyself, but shalt perform unto the Lord thine oaths:</text:span></text:p>
            <text:p text:style-name="P13"><text:span text:style-name="T11">[</text:span><text:span text:style-name="T9">34</text:span><text:span text:style-name="T11">] </text:span><text:span text:style-name="T10">But I say unto you, </text:span><text:span text:style-name="T12">Swear not at all</text:span><text:span text:style-name="T10">; neither by heaven; for it is God's throne:</text:span></text:p>
            <text:p text:style-name="P13"><text:span text:style-name="T11">[</text:span><text:span text:style-name="T9">35</text:span><text:span text:style-name="T11">] </text:span><text:span text:style-name="T10">Nor by the earth; for it is his footstool: neither by Jerusalem; for it is the city of the great King.</text:span></text:p>
            <text:p text:style-name="P13"><text:span text:style-name="T11">[</text:span><text:span text:style-name="T9">36</text:span><text:span text:style-name="T11">] </text:span><text:span text:style-name="T10">Neither shalt thou swear by thy head, because thou canst not make one hair white or black.</text:span></text:p>
            <text:p text:style-name="P13"><text:span text:style-name="T11">[</text:span><text:span text:style-name="T9">37</text:span><text:span text:style-name="T11">] </text:span><text:span text:style-name="T10">But let your communication be, Yea, yea; Nay, nay: </text:span><text:span text:style-name="T12">for whatsoever is more than these cometh of evil</text:span><text:span text:style-name="T10">.</text:span></text:p>
          </table:table-cell>
        </table:table-row>
      </table:table>
      <text:p text:style-name="P2"/>
      <table:table table:name="Table8" table:style-name="Table8">
        <table:table-column table:style-name="Table8.A"/>
        <table:table-row>
          <table:table-cell table:style-name="Table8.A1" office:value-type="string">
            <text:p text:style-name="P7"><text:span text:style-name="T4">FORSWEAR</text:span>, verb transitive preterit tense forswore; participle passive forsworn. See Swear and Answer.]</text:p>
            <text:p text:style-name="P7"/>
            <text:p text:style-name="P7">1. To reject or renounce upon oath.</text:p>
            <text:p text:style-name="P7">2. To deny upon oath.</text:p>
            <text:p text:style-name="P7">Like innocence, and as serenely bold as truth, how loudly he forswears thy gold.</text:p>
            <text:p text:style-name="P7"/>
            <text:p text:style-name="P7"><text:span text:style-name="T4">FORSWEAR</text:span>, verb intransitive To swear falsely; to commit perjury.</text:p>
          </table:table-cell>
        </table:table-row>
      </table:table>
      <text:p text:style-name="P2"/>
      <text:list text:style-name="L4">
        <text:list-item>
          <text:p text:style-name="P14">Jesus’ command is <text:span text:style-name="T13">not only to not swear by heaven, earth, or Jerusalem but also to not swear at all</text:span>. Instead, simply say yes or no.</text:p>
        </text:list-item>
        <text:list-item>
          <text:p text:style-name="P15">Note that the swearing of here pertains to swearing oaths not to swearing as in curse words</text:p>
          <text:list>
            <text:list-item>
              <text:p text:style-name="P14"><text:span text:style-name="T14">Col</text:span><text:span text:style-name="T15">ossians </text:span><text:span text:style-name="T14">3:8</text:span><text:span text:style-name="T16"> “But now ye also put off all these; anger, wrath, malice, blasphemy, filthy communication out of your mouth.”</text:span></text:p>
            </text:list-item>
          </text:list>
        </text:list-item>
      </text:list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ext:p text:style-name="P3">Matthew 12:34-37</text:p>
            <text:p text:style-name="P16"><text:span text:style-name="T17">[</text:span><text:span text:style-name="T9">34</text:span><text:span text:style-name="T17">] </text:span><text:span text:style-name="T10">O generation of vipers, how can ye, being evil, speak good things? for out of the abundance of the heart the mouth speaketh.</text:span></text:p>
            <text:p text:style-name="P16"><text:span text:style-name="T11">[</text:span><text:span text:style-name="T9">35</text:span><text:span text:style-name="T11">] </text:span><text:span text:style-name="T10">A good man out of the good treasure of the heart bringeth forth good things: and an evil man out of the evil treasure bringeth forth evil things.</text:span></text:p>
            <text:p text:style-name="P16"><text:span text:style-name="T11">[</text:span><text:span text:style-name="T9">36</text:span><text:span text:style-name="T11">] </text:span><text:span text:style-name="T10">But I say unto you, That </text:span><text:span text:style-name="T12">every idle word that men shall speak, they shall give account thereof in the day of judgment.</text:span></text:p>
            <text:p text:style-name="P16"><text:span text:style-name="T11">[</text:span><text:span text:style-name="T9">37</text:span><text:span text:style-name="T11">] </text:span><text:span text:style-name="T12">For by thy words thou shalt be justified, and by thy words thou shalt be condemned.</text:span></text:p>
          </table:table-cell>
        </table:table-row>
      </table:table>
      <text:p text:style-name="P2"/>
      <text:list text:style-name="L5">
        <text:list-item>
          <text:p text:style-name="P17">As you might imagine <text:span text:style-name="T18">or </text:span><text:span text:style-name="T19">have </text:span><text:span text:style-name="T18">discovered yourself from the bible</text:span>, <text:span text:style-name="T20">the command about </text:span>not being quick to speak also extends to regular speech, some of which we’ve covered in previous verse studies <text:span text:style-name="T21">(eg. </text:span><text:span text:style-name="T22">Pro. 18:21</text:span><text:span text:style-name="T23">, </text:span><text:span text:style-name="T24">I Sam. 14</text:span><text:span text:style-name="T25">, </text:span><text:span text:style-name="T24">Mark 6:23</text:span><text:span text:style-name="T21">)</text:span>. The above verse is one that was not included in those.</text:p>
        </text:list-item>
        <text:list-item>
          <text:p text:style-name="P18">Jesus makes it very clear that <text:span text:style-name="T26">every word</text:span> spoken matters thus we should all consider very carefully <text:span text:style-name="T27">and pray</text:span> before we say <text:span text:style-name="T26">anything</text:span>.</text:p>
        </text:list-item>
        <text:list-item>
          <text:p text:style-name="P19"><text:span text:style-name="T28">Verse 37 also makes a clear connection to</text:span> salvation</text:p>
          <text:list>
            <text:list-item>
              <text:p text:style-name="P19"><text:span text:style-name="T2">Romans 10:10</text:span><text:span text:style-name="T29"> - </text:span>“<text:span text:style-name="T30">For with the heart man believeth unto righteousness</text:span>; and <text:span text:style-name="T5">with the mouth confession is made unto salvation</text:span>.”</text:p>
            </text:list-item>
            <text:list-item>
              <text:p text:style-name="P19"><text:span text:style-name="T2">Acts 8:37</text:span> - “And Philip said, <text:span text:style-name="T30">If thou believest with all thine heart</text:span>, thou mayest. And <text:span text:style-name="T5">he</text:span> answered and <text:span text:style-name="T5">said</text:span>, <text:span text:style-name="T5">I believe that Jesus Christ is the Son of God.</text:span>”</text:p>
            </text:list-item>
          </text:list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2-29T13:36:21.531184276</meta:creation-date>
    <dc:date>2026-07-11T12:31:13.784052989</dc:date>
    <meta:editing-duration>PT1H56M37S</meta:editing-duration>
    <meta:editing-cycles>44</meta:editing-cycles>
    <meta:generator>LibreOffice/26.2.4.2$Linux_X86_64 LibreOffice_project/64a984c51f4702dbd3710b13428c673a2f1292e7</meta:generator>
    <meta:document-statistic meta:table-count="8" meta:image-count="0" meta:object-count="0" meta:page-count="2" meta:paragraph-count="52" meta:word-count="910" meta:character-count="4819" meta:non-whitespace-character-count="3972"/>
  </office:meta>
</office:document-meta>
</file>