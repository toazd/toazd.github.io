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3.95in" style:rel-column-width="32767*"/>
    </style:style>
    <style:style style:name="Table8.B" style:family="table-column">
      <style:table-column-properties style:column-width="3.9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3.95in" style:rel-column-width="32767*"/>
    </style:style>
    <style:style style:name="Table9.B" style:family="table-column">
      <style:table-column-properties style:column-width="3.9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style:font-name="Liberation Sans" fo:font-weight="bold" style:font-weight-asian="bold" style:font-weight-complex="bold"/>
    </style:style>
    <style:style style:name="P2" style:family="paragraph" style:parent-style-name="Standard">
      <style:text-properties style:font-name="Liberation Sans"/>
    </style:style>
    <style:style style:name="P3" style:family="paragraph" style:parent-style-name="Standard">
      <style:text-properties fo:color="#127622" loext:opacity="100%" style:font-name="Liberation Sans" officeooo:paragraph-rsid="0002ade9"/>
    </style:style>
    <style:style style:name="P4" style:family="paragraph" style:parent-style-name="Standard">
      <style:text-properties fo:color="#ff0000" loext:opacity="100%" style:font-name="Liberation Sans" officeooo:paragraph-rsid="0002ade9"/>
    </style:style>
    <style:style style:name="P5" style:family="paragraph" style:parent-style-name="Standard">
      <style:text-properties style:font-name="Liberation Sans" officeooo:paragraph-rsid="0002ade9"/>
    </style:style>
    <style:style style:name="P6" style:family="paragraph" style:parent-style-name="Standard">
      <style:text-properties style:use-window-font-color="true" loext:opacity="0%" style:font-name="Liberation Sans" officeooo:rsid="0004528f"/>
    </style:style>
    <style:style style:name="P7" style:family="paragraph" style:parent-style-name="Standard" style:list-style-name="L1">
      <style:text-properties style:use-window-font-color="true" loext:opacity="0%" style:font-name="Liberation Sans" officeooo:rsid="0004528f" officeooo:paragraph-rsid="0004528f"/>
    </style:style>
    <style:style style:name="P8" style:family="paragraph" style:parent-style-name="Standard" style:list-style-name="L1">
      <style:text-properties style:font-name="Liberation Sans" officeooo:rsid="0004528f" officeooo:paragraph-rsid="0004528f"/>
    </style:style>
    <style:style style:name="P9" style:family="paragraph" style:parent-style-name="Standard">
      <style:text-properties fo:color="#127622" loext:opacity="100%" style:font-name="Liberation Sans"/>
    </style:style>
    <style:style style:name="P10" style:family="paragraph" style:parent-style-name="Standard">
      <style:text-properties fo:color="#127622" loext:opacity="100%" style:font-name="Liberation Sans" officeooo:paragraph-rsid="0002b268"/>
    </style:style>
    <style:style style:name="P11" style:family="paragraph" style:parent-style-name="Standard">
      <style:text-properties style:font-name="Liberation Sans" officeooo:paragraph-rsid="0002b268"/>
    </style:style>
    <style:style style:name="P12" style:family="paragraph" style:parent-style-name="Table_20_Contents">
      <style:text-properties fo:color="#127622" loext:opacity="100%" style:font-name="Liberation Sans"/>
    </style:style>
    <style:style style:name="P13" style:family="paragraph" style:parent-style-name="Table_20_Contents">
      <style:text-properties style:font-name="Liberation Sans"/>
    </style:style>
    <style:style style:name="P14" style:family="paragraph" style:parent-style-name="Standard">
      <style:text-properties style:font-name="Liberation Sans" officeooo:paragraph-rsid="00074579"/>
    </style:style>
    <style:style style:name="P15" style:family="paragraph" style:parent-style-name="Table_20_Contents">
      <style:text-properties fo:color="#ff0000" loext:opacity="100%" style:font-name="Liberation Sans"/>
    </style:style>
    <style:style style:name="P16" style:family="paragraph" style:parent-style-name="Standard">
      <style:paragraph-properties fo:text-align="center" style:justify-single-word="false"/>
      <style:text-properties style:font-name="Liberation Sans" officeooo:rsid="0007ed95" officeooo:paragraph-rsid="0007ed95"/>
    </style:style>
    <style:style style:name="P17" style:family="paragraph" style:parent-style-name="Standard">
      <style:text-properties style:font-name="Liberation Sans" officeooo:paragraph-rsid="000966e0"/>
    </style:style>
    <style:style style:name="P18" style:family="paragraph" style:parent-style-name="Standard">
      <style:text-properties style:font-name="Liberation Sans" officeooo:rsid="000966e0" officeooo:paragraph-rsid="000966e0"/>
    </style:style>
    <style:style style:name="P19" style:family="paragraph" style:parent-style-name="Standard">
      <style:text-properties style:font-name="Liberation Sans" officeooo:paragraph-rsid="000cc02d"/>
    </style:style>
    <style:style style:name="P20" style:family="paragraph" style:parent-style-name="Standard">
      <style:text-properties style:font-name="Liberation Sans" officeooo:rsid="000cc02d" officeooo:paragraph-rsid="000cc02d"/>
    </style:style>
    <style:style style:name="P21" style:family="paragraph" style:parent-style-name="Standard">
      <style:paragraph-properties fo:text-align="left" style:justify-single-word="false"/>
      <style:text-properties style:font-name="Liberation Sans" officeooo:paragraph-rsid="000d29f2"/>
    </style:style>
    <style:style style:name="P22" style:family="paragraph" style:parent-style-name="Standard">
      <style:paragraph-properties fo:text-align="left" style:justify-single-word="false"/>
      <style:text-properties style:font-name="Liberation Sans" officeooo:rsid="000d29f2" officeooo:paragraph-rsid="000d29f2"/>
    </style:style>
    <style:style style:name="P23" style:family="paragraph" style:parent-style-name="Standard">
      <style:text-properties style:font-name="Liberation Sans" officeooo:paragraph-rsid="0013a23a"/>
    </style:style>
    <style:style style:name="P24" style:family="paragraph" style:parent-style-name="Standard">
      <style:text-properties officeooo:paragraph-rsid="001749b5"/>
    </style:style>
    <style:style style:name="P25" style:family="paragraph" style:parent-style-name="Standard">
      <style:text-properties style:text-position="0% 100%" style:font-name="Liberation Sans" officeooo:rsid="001749b5" officeooo:paragraph-rsid="001749b5"/>
    </style:style>
    <style:style style:name="P26" style:family="paragraph" style:parent-style-name="Table_20_Contents">
      <style:paragraph-properties fo:text-align="center" style:justify-single-word="false"/>
      <style:text-properties style:font-name="Liberation Sans" officeooo:rsid="001749b5" officeooo:paragraph-rsid="001749b5"/>
    </style:style>
    <style:style style:name="P27" style:family="paragraph" style:parent-style-name="Standard">
      <style:text-properties style:font-name="Liberation Sans" officeooo:paragraph-rsid="0017c4c4"/>
    </style:style>
    <style:style style:name="P28" style:family="paragraph" style:parent-style-name="Standard">
      <style:text-properties style:text-position="0% 100%" style:font-name="Liberation Sans" officeooo:rsid="001967ca" officeooo:paragraph-rsid="0017c4c4"/>
    </style:style>
    <style:style style:name="P29" style:family="paragraph" style:parent-style-name="Standard">
      <style:text-properties style:font-name="Liberation Sans" officeooo:rsid="001c7c9b" officeooo:paragraph-rsid="001c7c9b"/>
    </style:style>
    <style:style style:name="P30" style:family="paragraph" style:parent-style-name="Standard">
      <style:text-properties officeooo:paragraph-rsid="001c7c9b"/>
    </style:style>
    <style:style style:name="P31" style:family="paragraph" style:parent-style-name="Standard">
      <style:text-properties style:text-position="0% 100%" style:font-name="Liberation Sans" officeooo:rsid="001c7c9b" officeooo:paragraph-rsid="001c7c9b"/>
    </style:style>
    <style:style style:name="P32" style:family="paragraph" style:parent-style-name="Standard">
      <style:text-properties officeooo:paragraph-rsid="001e71b3"/>
    </style:style>
    <style:style style:name="P33" style:family="paragraph" style:parent-style-name="Standard">
      <style:text-properties style:text-position="0% 100%" style:font-name="Liberation Sans" officeooo:rsid="001e71b3" officeooo:paragraph-rsid="001e71b3"/>
    </style:style>
    <style:style style:name="P34" style:family="paragraph" style:parent-style-name="Standard">
      <style:text-properties officeooo:paragraph-rsid="00237d12"/>
    </style:style>
    <style:style style:name="P35" style:family="paragraph" style:parent-style-name="Standard">
      <style:text-properties style:text-position="0% 100%" style:font-name="Liberation Sans" officeooo:rsid="0022072b" officeooo:paragraph-rsid="00237d12"/>
    </style:style>
    <style:style style:name="T1" style:family="text">
      <style:text-properties style:use-window-font-color="true" loext:opacity="0%" fo:font-weight="normal" style:font-weight-asian="normal" style:font-weight-complex="normal"/>
    </style:style>
    <style:style style:name="T2" style:family="text">
      <style:text-properties style:use-window-font-color="true" loext:opacity="0%" fo:font-weight="normal" officeooo:rsid="002a0011" style:font-weight-asian="normal" style:font-weight-complex="normal"/>
    </style:style>
    <style:style style:name="T3" style:family="text">
      <style:text-properties fo:color="#127622" loext:opacity="100%"/>
    </style:style>
    <style:style style:name="T4" style:family="text">
      <style:text-properties style:use-window-font-color="true" loext:opacity="0%"/>
    </style:style>
    <style:style style:name="T5" style:family="text">
      <style:text-properties style:text-position="super 58%"/>
    </style:style>
    <style:style style:name="T6" style:family="text">
      <style:text-properties officeooo:rsid="0022b06c"/>
    </style:style>
    <style:style style:name="T7" style:family="text">
      <style:text-properties officeooo:rsid="002f5a49"/>
    </style:style>
    <style:style style:name="T8" style:family="text">
      <style:text-properties officeooo:rsid="0028ec2e"/>
    </style:style>
    <style:style style:name="T9" style:family="text">
      <style:text-properties style:text-underline-style="solid" style:text-underline-width="auto" style:text-underline-color="font-color"/>
    </style:style>
    <style:style style:name="T10" style:family="text">
      <style:text-properties fo:background-color="#ffff00" loext:char-shading-value="0"/>
    </style:style>
    <style:style style:name="T11" style:family="text">
      <style:text-properties officeooo:rsid="0024ef3a"/>
    </style:style>
    <style:style style:name="T12" style:family="text">
      <style:text-properties style:use-window-font-color="true" loext:opacity="0%" officeooo:rsid="0004528f"/>
    </style:style>
    <style:style style:name="T13" style:family="text">
      <style:text-properties style:use-window-font-color="true" loext:opacity="0%" officeooo:rsid="002787ea"/>
    </style:style>
    <style:style style:name="T14" style:family="text">
      <style:text-properties style:font-name="Liberation Sans"/>
    </style:style>
    <style:style style:name="T15" style:family="text">
      <style:text-properties fo:color="#127622" loext:opacity="100%" style:font-name="Liberation Sans"/>
    </style:style>
    <style:style style:name="T16" style:family="text">
      <style:text-properties style:font-name="Liberation Sans" fo:background-color="#ffff00" loext:char-shading-value="0"/>
    </style:style>
    <style:style style:name="T17" style:family="text">
      <style:text-properties officeooo:rsid="00074579"/>
    </style:style>
    <style:style style:name="T18" style:family="text">
      <style:text-properties officeooo:rsid="00087f36"/>
    </style:style>
    <style:style style:name="T19" style:family="text">
      <style:text-properties officeooo:rsid="00309cfc"/>
    </style:style>
    <style:style style:name="T20" style:family="text">
      <style:text-properties officeooo:rsid="000966e0"/>
    </style:style>
    <style:style style:name="T21" style:family="text">
      <style:text-properties fo:font-style="italic" officeooo:rsid="000966e0" style:font-style-asian="italic" style:font-style-complex="italic"/>
    </style:style>
    <style:style style:name="T22" style:family="text">
      <style:text-properties officeooo:rsid="000cc02d"/>
    </style:style>
    <style:style style:name="T23" style:family="text">
      <style:text-properties officeooo:rsid="000f2d4b"/>
    </style:style>
    <style:style style:name="T24" style:family="text">
      <style:text-properties officeooo:rsid="000d29f2"/>
    </style:style>
    <style:style style:name="T25" style:family="text">
      <style:text-properties officeooo:rsid="000e00f5"/>
    </style:style>
    <style:style style:name="T26" style:family="text">
      <style:text-properties officeooo:rsid="00112773"/>
    </style:style>
    <style:style style:name="T27" style:family="text">
      <style:text-properties officeooo:rsid="0012df18"/>
    </style:style>
    <style:style style:name="T28" style:family="text">
      <style:text-properties officeooo:rsid="00114a55"/>
    </style:style>
    <style:style style:name="T29" style:family="text">
      <style:text-properties officeooo:rsid="00157856"/>
    </style:style>
    <style:style style:name="T30" style:family="text">
      <style:text-properties officeooo:rsid="001749b5"/>
    </style:style>
    <style:style style:name="T31" style:family="text">
      <style:text-properties style:text-underline-style="solid" style:text-underline-width="auto" style:text-underline-color="font-color" officeooo:rsid="00157856"/>
    </style:style>
    <style:style style:name="T32" style:family="text">
      <style:text-properties officeooo:rsid="000fb66a"/>
    </style:style>
    <style:style style:name="T33" style:family="text">
      <style:text-properties officeooo:rsid="0013a23a"/>
    </style:style>
    <style:style style:name="T34" style:family="text">
      <style:text-properties officeooo:rsid="002b8825"/>
    </style:style>
    <style:style style:name="T35" style:family="text">
      <style:text-properties officeooo:rsid="0013a23a" fo:background-color="#ffff00" loext:char-shading-value="0"/>
    </style:style>
    <style:style style:name="T36" style:family="text">
      <style:text-properties style:text-underline-style="solid" style:text-underline-width="auto" style:text-underline-color="font-color" officeooo:rsid="0013a23a"/>
    </style:style>
    <style:style style:name="T37" style:family="text">
      <style:text-properties style:text-position="0% 100%" style:font-name="Liberation Sans" officeooo:rsid="001749b5"/>
    </style:style>
    <style:style style:name="T38" style:family="text">
      <style:text-properties fo:background-color="#ffb66c" loext:char-shading-value="0"/>
    </style:style>
    <style:style style:name="T39" style:family="text">
      <style:text-properties fo:background-color="#ffd428" loext:char-shading-value="0"/>
    </style:style>
    <style:style style:name="T40" style:family="text">
      <style:text-properties style:text-position="0% 100%" officeooo:rsid="0017c4c4"/>
    </style:style>
    <style:style style:name="T41" style:family="text">
      <style:text-properties style:text-position="0% 100%" officeooo:rsid="001967ca"/>
    </style:style>
    <style:style style:name="T42" style:family="text">
      <style:text-properties style:text-position="0% 100%"/>
    </style:style>
    <style:style style:name="T43" style:family="text">
      <style:text-properties style:text-position="0% 100%" officeooo:rsid="002d4b0e"/>
    </style:style>
    <style:style style:name="T44" style:family="text">
      <style:text-properties style:text-position="0% 100%" style:font-name="Liberation Sans" officeooo:rsid="001c7c9b"/>
    </style:style>
    <style:style style:name="T45" style:family="text">
      <style:text-properties style:text-position="0% 100%" style:font-name="Liberation Sans" officeooo:rsid="001e71b3"/>
    </style:style>
    <style:style style:name="T46" style:family="text">
      <style:text-properties style:text-position="0% 100%" style:font-name="Liberation Sans" officeooo:rsid="002d7e4e"/>
    </style:style>
    <style:style style:name="T47" style:family="text">
      <style:text-properties style:text-position="0% 100%" style:font-name="Liberation Sans" officeooo:rsid="001fba58"/>
    </style:style>
    <style:style style:name="T48" style:family="text">
      <style:text-properties style:text-position="0% 100%" style:font-name="Liberation Sans" style:text-underline-style="solid" style:text-underline-width="auto" style:text-underline-color="font-color" officeooo:rsid="001e71b3"/>
    </style:style>
    <style:style style:name="T49" style:family="text">
      <style:text-properties style:text-position="0% 100%" style:font-name="Liberation Sans" officeooo:rsid="0020ab6e"/>
    </style:style>
    <style:style style:name="T50" style:family="text">
      <style:text-properties style:text-position="0% 100%" style:font-name="Liberation Sans" officeooo:rsid="0022072b"/>
    </style:style>
    <style:style style:name="T51" style:family="text">
      <style:text-properties style:text-position="0% 100%" style:font-name="Liberation Sans" officeooo:rsid="0022b06c"/>
    </style:style>
    <style:style style:name="T52" style:family="text">
      <style:text-properties style:text-position="0% 100%" style:font-name="Liberation Sans" officeooo:rsid="0034184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13<text:span text:style-name="T1"> </text:span><text:span text:style-name="T2">(pp. Mark 9:50, Luke 14:34,35)</text:span></text:p>
      <text:p text:style-name="P2">¶ Ye are the salt of the earth: but if the salt have lost his savour, wherewith shall it be salted? it is thenceforth good for nothing, but to be cast out, and to be trodden under foot of men.</text:p>
      <text:p text:style-name="P2"/>
      <text:p text:style-name="P2">Read <text:span text:style-name="T3">Matthew 4:23-5:16</text:span><text:span text:style-name="T4">.</text:span></text:p>
      <text:p text:style-name="P2"/>
      <text:p text:style-name="P2">Note the context. Jesus is speaking to his disciples after going up into a mountain away from the multitudes. This verse occurs during what is commonly referred to as “the sermon on the mount” and directly follows what is commonly referred to as “the beatitudes.”</text:p>
      <text:p text:style-name="P2"/>
      <text:p text:style-name="P2">Note that <text:span text:style-name="T3">Matthew 5:13-16</text:span> are all one paragraph. (side-note: in the 1611 KJV the pilcrow/paragraph marker does not appear after <text:span text:style-name="T3">Acts 20:36</text:span><text:span text:style-name="T5">1</text:span>).</text:p>
      <text:p text:style-name="P2"/>
      <text:p text:style-name="P2">Think about salt and its properties, namely the effects it has on the things that touch it and surround it. <text:span text:style-name="T6">Now think of disciples of Christ “sprinkled” throughout the world. </text:span>Salt can be used as an antiseptic to fight infections <text:span text:style-name="T7">and neutralize toxins </text:span>and it can also be used to “bring out” or enhance the flavor of food that it comes into contact with.</text:p>
      <text:p text:style-name="P2"/>
      <text:p text:style-name="P2"><text:span text:style-name="T7">In</text:span> <text:span text:style-name="T3">Mt. 5:13</text:span> Jesus is likening his disciples (<text:span text:style-name="T3">Mt. 5:1,2</text:span>) to salt. Antiseptics are both “clean” and “pure” (<text:span text:style-name="T3">John 15:3</text:span>, <text:span text:style-name="T3">Col. 1:21,22</text:span>) and they prevent the growth of diseases (<text:span text:style-name="T3">1 Cor. 5:6b-7c</text:span>). <text:span text:style-name="T8">Likewise</text:span>, the behavior and <text:span text:style-name="T9">prayers</text:span> of disciples of Christ can have a profound impact on the people they come into contact with <text:span text:style-name="T8">and the world around them.</text:span></text:p>
      <text:p text:style-name="P2"/>
      <table:table table:name="Table1" table:style-name="Table1">
        <table:table-column table:style-name="Table1.A"/>
        <table:table-row>
          <table:table-cell table:style-name="Table1.A1" office:value-type="string">
            <text:p text:style-name="P3">John 15:3</text:p>
            <text:p text:style-name="P4">Now ye are <text:span text:style-name="T10">clean</text:span> through the word which I have spoken unto you.</text:p>
          </table:table-cell>
        </table:table-row>
        <table:table-row>
          <table:table-cell table:style-name="Table1.A2" office:value-type="string">
            <text:p text:style-name="P3">Colossians 1:21-22</text:p>
            <text:p text:style-name="P5">And you, that were sometime alienated and enemies in your mind by wicked works, yet now hath he reconciled [<text:span text:style-name="T3">22</text:span>] In the body of his flesh through death, to present you <text:span text:style-name="T10">holy</text:span> and unblameable and unreproveable in his sight:</text:p>
          </table:table-cell>
        </table:table-row>
        <table:table-row>
          <table:table-cell table:style-name="Table1.A2" office:value-type="string">
            <text:p text:style-name="P3">1 Corinthians 5:6b-7c</text:p>
            <text:p text:style-name="P5">Know ye not that a little leaven leaveneth the whole lump? [<text:span text:style-name="T3">7</text:span>] <text:span text:style-name="T10">Purge out therefore the old leaven</text:span>, that ye may be a new lump, as ye are unleavened.</text:p>
          </table:table-cell>
        </table:table-row>
      </table:table>
      <text:p text:style-name="P2"/>
      <text:p text:style-name="P2">But, what does Jesus mean here when he says “...if the salt have lost his savour…?” Salt is salt and it always tastes the same so He doesn’t seem to be referencing the literal flavor. If it’s not literal then perhaps it’s a symbolic parallel reference <text:span text:style-name="T11">betwixt </text:span>His disciples <text:span text:style-name="T11">and salt</text:span>?</text:p>
      <text:p text:style-name="P2"/>
      <text:p text:style-name="P2">The first biblical usage of the word “savour” and the phrase “sweet savour” occurs in <text:span text:style-name="T3">Genesis 8:21.</text:span><text:span text:style-name="T4"> </text:span><text:span text:style-name="T12">Read </text:span><text:span text:style-name="T3">Genesis 8:18-21</text:span><text:span text:style-name="T12"> very carefully and take note of the order of events:</text:span></text:p>
      <text:p text:style-name="P6"/>
      <text:list text:style-name="L1">
        <text:list-item>
          <text:p text:style-name="P7">Noah, his family, and all the creatures exit the ark after the flood.</text:p>
        </text:list-item>
        <text:list-item>
          <text:p text:style-name="P7">Noah builds an altar and offers sacrifices to the LORD.</text:p>
        </text:list-item>
        <text:list-item>
          <text:p text:style-name="P8"><text:span text:style-name="T4">The LORD responds with a promise, </text:span><text:span text:style-name="T13">a covenant, and a token.</text:span></text:p>
        </text:list-item>
      </text:list>
      <text:p text:style-name="P9"/>
      <table:table table:name="Table2" table:style-name="Table2">
        <table:table-column table:style-name="Table2.A"/>
        <table:table-row>
          <table:table-cell table:style-name="Table2.A1" office:value-type="string">
            <text:p text:style-name="P10">Genesis 8:18-21</text:p>
            <text:p text:style-name="P11">And Noah went forth, and his sons, and his wife, and his sons' wives with him: [<text:span text:style-name="T3">19</text:span>] Every beast, every creeping thing, and every fowl, and whatsoever creepeth upon the earth, after their kinds, went forth out of the ark. [<text:span text:style-name="T3">20</text:span>] And Noah builded an altar unto the LORD; and took of every clean beast, and of every clean fowl, and offered burnt offerings on the altar. [<text:span text:style-name="T3">21</text:span>] And the LORD smelled a sweet savour; and the LORD said in his heart, I will not again curse the ground any more for man's sake; for the imagination of man's heart is evil from his youth; neither will I again smite any more every thing living, as I have done.</text:p>
          </table:table-cell>
        </table:table-row>
      </table:table>
      <table:table table:name="Table3" table:style-name="Table3">
        <table:table-column table:style-name="Table3.A"/>
        <text:soft-page-break/>
        <table:table-row>
          <table:table-cell table:style-name="Table3.A1" office:value-type="string">
            <text:p text:style-name="P12">Psalm 51:15-16</text:p>
            <text:p text:style-name="Table_20_Contents"><text:span text:style-name="T14">O Lord, open thou my lips; and my mouth shall shew forth thy praise. [</text:span><text:span text:style-name="T15">16</text:span><text:span text:style-name="T14">] For </text:span><text:span text:style-name="T16">thou desirest not sacrifice</text:span><text:span text:style-name="T14">; else would I give it: </text:span><text:span text:style-name="T16">thou delightest not in burnt offering</text:span><text:span text:style-name="T14">.</text:span></text:p>
          </table:table-cell>
        </table:table-row>
        <table:table-row>
          <table:table-cell table:style-name="Table3.A2" office:value-type="string">
            <text:p text:style-name="P12">Hebrews 10:5-8</text:p>
            <text:p text:style-name="P13">Wherefore when he cometh into the world, he saith, Sacrifice and offering thou wouldest not, but a body hast thou prepared me: [<text:span text:style-name="T3">6</text:span>] <text:span text:style-name="T10">In burnt offerings and sacrifices for sin thou hast had no pleasure</text:span>. [<text:span text:style-name="T3">7</text:span>] Then said I, Lo, I come (in the volume of the book it is written of me,) to do thy will, O God. [<text:span text:style-name="T3">8</text:span>] Above when he said, Sacrifice and offering and burnt offerings and offering for sin thou wouldest not, neither hadst pleasure therein; which are offered by the law;</text:p>
          </table:table-cell>
        </table:table-row>
      </table:table>
      <text:p text:style-name="P2"/>
      <text:p text:style-name="P14"><text:span text:style-name="T17">If God does not desire sacrifice nor delight in burnt offering and has no pleasure in burnt offerings and sacrifices for sin, then what did the LORD “smell” in </text:span><text:span text:style-name="T3">Gen. 8:21</text:span><text:span text:style-name="T17"> that was sweet? Side-note: God is a spirit so I don’t think it’s safe to assume that He physically smelled the sacrifice.</text:span></text:p>
      <text:p text:style-name="P14"/>
      <table:table table:name="Table4" table:style-name="Table4">
        <table:table-column table:style-name="Table4.A"/>
        <table:table-row>
          <table:table-cell table:style-name="Table4.A1" office:value-type="string">
            <text:p text:style-name="P12">John 4:24</text:p>
            <text:p text:style-name="P15">God is a Spirit: and they that worship him must worship him in spirit and in truth.</text:p>
          </table:table-cell>
        </table:table-row>
      </table:table>
      <text:p text:style-name="P14"/>
      <text:p text:style-name="P16"><text:span text:style-name="T18">Side-note: biblical u</text:span>sages of “savour” that convey <text:span text:style-name="T19">the idea of </text:span>a physical smell</text:p>
      <table:table table:name="Table5" table:style-name="Table5">
        <table:table-column table:style-name="Table5.A"/>
        <table:table-row>
          <table:table-cell table:style-name="Table5.A1" office:value-type="string">
            <text:p text:style-name="P12">Ecclesiastes 10:1</text:p>
            <text:p text:style-name="P13">Dead flies cause the ointment of the apothecary to send forth a stinking <text:span text:style-name="T10">savour</text:span>: so doth a little folly him that is in reputation for wisdom and honour.</text:p>
          </table:table-cell>
        </table:table-row>
        <table:table-row>
          <table:table-cell table:style-name="Table5.A2" office:value-type="string">
            <text:p text:style-name="P12">Song of Solomon 1:3</text:p>
            <text:p text:style-name="P13">Because of the <text:span text:style-name="T10">savour</text:span> of thy good ointments thy name is as ointment poured forth, therefore do the virgins love thee.</text:p>
          </table:table-cell>
        </table:table-row>
      </table:table>
      <text:p text:style-name="P2"/>
      <text:p text:style-name="P17"><text:span text:style-name="T20">The phrase “sweet savour” occurs 43 times in the bible and in every instance it is closely associated with sacrifice and worship (except </text:span><text:span text:style-name="T21">maybe</text:span><text:span text:style-name="T20"> </text:span><text:span text:style-name="T3">2 Cor. 2:15</text:span><text:span text:style-name="T20">).</text:span></text:p>
      <text:p text:style-name="P18"/>
      <text:p text:style-name="P19"><text:span text:style-name="T22">So, what then is this “sweet savour” to which God responds to with a promise in </text:span><text:span text:style-name="T3">Gen. 8:21</text:span><text:span text:style-name="T22"> and to which it is possible for a disciple of Christ to lose?</text:span></text:p>
      <text:p text:style-name="P20"/>
      <text:p text:style-name="P21"><text:span text:style-name="T23">In </text:span><text:span text:style-name="T3">Leviticus 26:31</text:span><text:span text:style-name="T24"> we learn that </text:span><text:span text:style-name="T25">a </text:span><text:span text:style-name="T24">“savour” can also be referred to as a “odour” </text:span><text:span text:style-name="T23">and the context (curses for disobedience which follows blessings for obedience) tells us that God will not “smell” the peoples “response” to their punishment following repeated chastisements. </text:span><text:span text:style-name="T26">When God’s people are afflicted, what do you suppose is a</text:span><text:span text:style-name="T27">n appropriate</text:span><text:span text:style-name="T26"> response </text:span><text:span text:style-name="T28">assuming they want reconciliation? </text:span><text:span text:style-name="T29">The</text:span><text:span text:style-name="T30">y</text:span><text:span text:style-name="T29"> will “cry out” or </text:span><text:span text:style-name="T31">pray</text:span><text:span text:style-name="T29"> to God.</text:span></text:p>
      <text:p text:style-name="P22"/>
      <table:table table:name="Table6" table:style-name="Table6">
        <table:table-column table:style-name="Table6.A"/>
        <table:table-row>
          <table:table-cell table:style-name="Table6.A1" office:value-type="string">
            <text:p text:style-name="P13"><text:span text:style-name="T3">Leviticus 26:31</text:span> <text:span text:style-name="T25">(</text:span><text:span text:style-name="T32">r</text:span><text:span text:style-name="T25">ead </text:span><text:span text:style-name="T3">Leviticus 26:14-39</text:span><text:span text:style-name="T25"> for context)</text:span></text:p>
            <text:p text:style-name="P13">And I will make your cities waste, and bring your sanctuaries unto desolation, and I will not smell the <text:span text:style-name="T10">savour</text:span> of your <text:span text:style-name="T10">sweet odours</text:span>.</text:p>
          </table:table-cell>
        </table:table-row>
      </table:table>
      <text:p text:style-name="P20"/>
      <text:p text:style-name="P23"><text:span text:style-name="T33">In </text:span><text:span text:style-name="T3">Revelation 5:8</text:span><text:span text:style-name="T33"> we learn that the </text:span><text:span text:style-name="T34">four beasts and the </text:span><text:span text:style-name="T33">twenty-four elders are holding harps and golden vials full of </text:span><text:span text:style-name="T35">odours</text:span><text:span text:style-name="T33">, which are the </text:span><text:span text:style-name="T36">prayers</text:span><text:span text:style-name="T33"> of saints.</text:span></text:p>
      <text:p text:style-name="P23"/>
      <table:table table:name="Table7" table:style-name="Table7">
        <table:table-column table:style-name="Table7.A"/>
        <table:table-row>
          <table:table-cell table:style-name="Table7.A1" office:value-type="string">
            <text:p text:style-name="P12">Revelation 5:8</text:p>
            <text:p text:style-name="P13">And when he had taken the book, the four beasts and four and twenty elders fell down before the Lamb, having every one of them harps, and <text:span text:style-name="T10">golden vials full of odours</text:span>, <text:span text:style-name="T10">which are the prayers of saints</text:span>.</text:p>
          </table:table-cell>
        </table:table-row>
      </table:table>
      <text:p text:style-name="P20"/>
      <text:p text:style-name="P2"/>
      <text:p text:style-name="P24"><text:soft-page-break/><text:span text:style-name="T37">Lets go back to </text:span><text:span text:style-name="T15">Genesis 8:21</text:span><text:span text:style-name="T37"> and apply what we’ve learned from scripture.</text:span></text:p>
      <text:p text:style-name="P25"/>
      <table:table table:name="Table8" table:style-name="Table8">
        <table:table-column table:style-name="Table8.A"/>
        <table:table-column table:style-name="Table8.B"/>
        <table:table-row>
          <table:table-cell table:style-name="Table8.A1" office:value-type="string">
            <text:p text:style-name="P26">And the LORD <text:span text:style-name="T38">smelled</text:span> a <text:span text:style-name="T39">sweet savour</text:span>;</text:p>
          </table:table-cell>
          <table:table-cell table:style-name="Table8.B1" office:value-type="string">
            <text:p text:style-name="P26">And the LORD <text:span text:style-name="T38">heard</text:span> a <text:span text:style-name="T39">prayer of a saint</text:span></text:p>
          </table:table-cell>
        </table:table-row>
      </table:table>
      <text:p text:style-name="P25"/>
      <text:p text:style-name="P27"><text:span text:style-name="T40">Remember that there were only eight souls on the ark (</text:span><text:span text:style-name="T3">Genesis 7:7</text:span><text:span text:style-name="T40">, </text:span><text:span text:style-name="T3">I Peter 3:20</text:span><text:span text:style-name="T40">). Think of the tremendous loss that Noah was burdened with. </text:span><text:span text:style-name="T41">What do you think that Noah would have prayed for at that alter to which the LORD responded with a promise (</text:span><text:span text:style-name="T3">Genesis 8:21</text:span><text:span text:style-name="T41">), a covenant, and a token (</text:span><text:span text:style-name="T3">Genesis 9:8-17</text:span><text:span text:style-name="T41">)?</text:span></text:p>
      <text:p text:style-name="P28"/>
      <text:p text:style-name="P29"><text:span text:style-name="T41">N</text:span><text:span text:style-name="T42">umerous verses convey to us the importance of prayers. </text:span><text:span text:style-name="T43">Here are a few:</text:span></text:p>
      <table:table table:name="Table9" table:style-name="Table9">
        <table:table-column table:style-name="Table9.A"/>
        <table:table-column table:style-name="Table9.B"/>
        <table:table-row>
          <table:table-cell table:style-name="Table9.A1" office:value-type="string">
            <text:p text:style-name="P12">John 15:5</text:p>
            <text:p text:style-name="P15">I am the vine, ye are the branches: He that abideth in me, and I in him, the same bringeth forth much fruit: for <text:span text:style-name="T10">without me ye can do nothing</text:span>.</text:p>
          </table:table-cell>
          <table:table-cell table:style-name="Table9.B1" office:value-type="string">
            <text:p text:style-name="P12">Philippians 4:6</text:p>
            <text:p text:style-name="P13">Be careful for nothing; but in <text:span text:style-name="T10">every thing by prayer</text:span> and supplication with thanksgiving let your requests be made known unto God.</text:p>
          </table:table-cell>
        </table:table-row>
        <table:table-row>
          <table:table-cell table:style-name="Table9.A2" office:value-type="string">
            <text:p text:style-name="P12">Luke 18:1</text:p>
            <text:p text:style-name="P13">And he spake a parable unto them to this end, that <text:span text:style-name="T10">men ought always to pray</text:span>, and not to faint;</text:p>
          </table:table-cell>
          <table:table-cell table:style-name="Table9.B2" office:value-type="string">
            <text:p text:style-name="P12">1 Thessalonians 5:17</text:p>
            <text:p text:style-name="P13"><text:span text:style-name="T10">Pray without ceasing</text:span>.</text:p>
          </table:table-cell>
        </table:table-row>
        <table:table-row>
          <table:table-cell table:style-name="Table9.A2" office:value-type="string">
            <text:p text:style-name="P12">Jeremiah 33:3</text:p>
            <text:p text:style-name="P13">Call unto me, and I will answer thee, and shew thee great and mighty things, which thou knowest not.</text:p>
          </table:table-cell>
          <table:table-cell table:style-name="Table9.B2" office:value-type="string">
            <text:p text:style-name="P12">Psalm 116:2</text:p>
            <text:p text:style-name="P13">Because he hath inclined his ear unto me, therefore will I <text:span text:style-name="T10">call upon him as long as I live</text:span>.</text:p>
          </table:table-cell>
        </table:table-row>
        <table:table-row>
          <table:table-cell table:style-name="Table9.A2" office:value-type="string">
            <text:p text:style-name="Table_20_Contents"><text:span text:style-name="T15">Ephesians 6:18</text:span><text:span text:style-name="T14"> KJV</text:span></text:p>
            <text:p text:style-name="P13"><text:span text:style-name="T10">Praying always</text:span> with all prayer and supplication in the Spirit, and watching thereunto with all perseverance and supplication for all saints;</text:p>
          </table:table-cell>
          <table:table-cell table:style-name="Table9.B2" office:value-type="string">
            <text:p text:style-name="P12">Psalm 86:3</text:p>
            <text:p text:style-name="P13">Be merciful unto me, O Lord: for I <text:span text:style-name="T10">cry unto thee daily</text:span>.</text:p>
          </table:table-cell>
        </table:table-row>
      </table:table>
      <text:p text:style-name="P28"/>
      <text:p text:style-name="P30"><text:span text:style-name="T44">Going back to </text:span><text:span text:style-name="T15">Matthew 5:13</text:span><text:span text:style-name="T44"> and applying what we’ve learned from scripture: what then could a disciple of Christ “lose” that would make them “good for nothing”?</text:span></text:p>
      <text:p text:style-name="P31"/>
      <text:p text:style-name="P32"><text:span text:style-name="T45">If our means through which we “</text:span><text:span text:style-name="T46">bear much fruit” (</text:span><text:span text:style-name="T15">John 15:8</text:span><text:span text:style-name="T46">) is</text:span><text:span text:style-name="T45"> Christ (</text:span><text:span text:style-name="T15">John 15:5</text:span><text:span text:style-name="T45">) and our method is to pray </text:span><text:span text:style-name="T47">in the name of Jesus Christ </text:span><text:span text:style-name="T45">I think the answer becomes clear: </text:span><text:span text:style-name="T48">prayer</text:span><text:span text:style-name="T45">!</text:span></text:p>
      <text:p text:style-name="P33"/>
      <text:p text:style-name="P34"><text:span text:style-name="T47">Thus, we conclude: if a disciple of Christ ceases to pray – they </text:span><text:span text:style-name="T49">can </text:span><text:span text:style-name="T47">become “good for nothing”, </text:span><text:span text:style-name="T50">or worse “cast out”.</text:span></text:p>
      <text:p text:style-name="P35"/>
      <text:p text:style-name="P34"><text:span text:style-name="T51">In light of </text:span><text:span text:style-name="T52">all we have learned</text:span><text:span text:style-name="T51">, </text:span><text:span text:style-name="T15">Matthew 5:13</text:span><text:span text:style-name="T51"> becomes an encouragement from Christ to His disciples to pray.</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text:span text:style-name="T5">1</text:span>http://av1611blogger.blogspot.com/2013/07/why-do-paragraph-marks-stop.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24T12:47:59.120637037</meta:creation-date>
    <meta:editing-cycles>60</meta:editing-cycles>
    <meta:editing-duration>PT2H15M57S</meta:editing-duration>
    <dc:date>2026-07-11T12:21:22.088977011</dc:date>
    <meta:generator>LibreOffice/26.2.4.2$Linux_X86_64 LibreOffice_project/64a984c51f4702dbd3710b13428c673a2f1292e7</meta:generator>
    <meta:document-statistic meta:table-count="9" meta:image-count="0" meta:object-count="0" meta:page-count="3" meta:paragraph-count="66" meta:word-count="1417" meta:character-count="7870" meta:non-whitespace-character-count="6521"/>
  </office:meta>
</office:document-meta>
</file>