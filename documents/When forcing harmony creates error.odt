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 style:writing-mode="lr-tb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 style:writing-mode="lr-tb"/>
    </style:style>
    <style:style style:name="Table2.A" style:family="table-column">
      <style:table-column-properties style:column-width="2.6333in" style:rel-column-width="21845*"/>
    </style:style>
    <style:style style:name="Table2.A1" style:family="table-cell">
      <style:table-cell-properties fo:padding="0.0382in" fo:border-left="0.75pt solid #000000" fo:border-right="none" fo:border-top="0.75pt solid #000000" fo:border-bottom="0.75pt solid #000000"/>
    </style:style>
    <style:style style:name="Table2.C1" style:family="table-cell">
      <style:table-cell-properties fo:padding="0.0382in" fo:border="0.75pt solid #000000"/>
    </style:style>
    <style:style style:name="Table3" style:family="table">
      <style:table-properties style:width="7.9in" table:align="margins" style:writing-mode="lr-tb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7.9in" table:align="margins" style:writing-mode="lr-tb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75pt solid #000000"/>
    </style:style>
    <style:style style:name="Table4.A2" style:family="table-cell">
      <style:table-cell-properties fo:padding="0.0382in" fo:border-left="0.75pt solid #000000" fo:border-right="0.75pt solid #000000" fo:border-top="none" fo:border-bottom="0.75pt solid #000000"/>
    </style:style>
    <style:style style:name="Table5" style:family="table">
      <style:table-properties style:width="7.9in" table:align="margins" style:writing-mode="lr-tb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Gabriela" fo:font-size="14pt" officeooo:rsid="001cbfe6" officeooo:paragraph-rsid="001cbfe6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127622" loext:opacity="100%" style:font-name="Gabriela" fo:font-size="12pt" officeooo:rsid="00a8d609" officeooo:paragraph-rsid="00a8d609" style:font-size-asian="12pt" style:font-size-complex="12pt"/>
    </style:style>
    <style:style style:name="P3" style:family="paragraph" style:parent-style-name="Standard">
      <style:text-properties officeooo:rsid="001d1cc6" officeooo:paragraph-rsid="001d1cc6"/>
    </style:style>
    <style:style style:name="P4" style:family="paragraph" style:parent-style-name="Standard">
      <style:text-properties officeooo:rsid="001f0b01" officeooo:paragraph-rsid="001f0b01"/>
    </style:style>
    <style:style style:name="P5" style:family="paragraph" style:parent-style-name="Standard">
      <style:text-properties officeooo:paragraph-rsid="001f67da"/>
    </style:style>
    <style:style style:name="P6" style:family="paragraph" style:parent-style-name="Standard">
      <style:text-properties officeooo:rsid="0022fd9f" officeooo:paragraph-rsid="0022fd9f"/>
    </style:style>
    <style:style style:name="P7" style:family="paragraph" style:parent-style-name="Standard" style:list-style-name="L1">
      <style:text-properties fo:font-weight="bold" officeooo:rsid="0023b131" officeooo:paragraph-rsid="0023b131" style:font-weight-asian="bold" style:font-weight-complex="bold"/>
    </style:style>
    <style:style style:name="P8" style:family="paragraph" style:parent-style-name="Standard" style:list-style-name="L1">
      <style:text-properties officeooo:rsid="0023b131" officeooo:paragraph-rsid="0023b131"/>
    </style:style>
    <style:style style:name="P9" style:family="paragraph" style:parent-style-name="Standard" style:list-style-name="L1">
      <style:text-properties officeooo:rsid="002900fb" officeooo:paragraph-rsid="002900fb"/>
    </style:style>
    <style:style style:name="P10" style:family="paragraph" style:parent-style-name="Standard" style:list-style-name="L1">
      <style:text-properties officeooo:rsid="00291108" officeooo:paragraph-rsid="00291108"/>
    </style:style>
    <style:style style:name="P11" style:family="paragraph" style:parent-style-name="Standard" style:list-style-name="L1">
      <style:text-properties officeooo:rsid="0024a309" officeooo:paragraph-rsid="0024a309"/>
    </style:style>
    <style:style style:name="P12" style:family="paragraph" style:parent-style-name="Standard" style:list-style-name="L1">
      <style:text-properties officeooo:rsid="0024dfe2" officeooo:paragraph-rsid="0024dfe2"/>
    </style:style>
    <style:style style:name="P13" style:family="paragraph" style:parent-style-name="Standard" style:list-style-name="L1">
      <style:text-properties fo:font-weight="bold" officeooo:rsid="0026d818" officeooo:paragraph-rsid="0026d818" style:font-weight-asian="bold" style:font-weight-complex="bold"/>
    </style:style>
    <style:style style:name="P14" style:family="paragraph" style:parent-style-name="Standard" style:list-style-name="L1">
      <style:text-properties officeooo:rsid="0026d818" officeooo:paragraph-rsid="0026d818"/>
    </style:style>
    <style:style style:name="P15" style:family="paragraph" style:parent-style-name="Standard" style:list-style-name="L1">
      <style:text-properties fo:font-weight="bold" officeooo:rsid="00278307" officeooo:paragraph-rsid="00278307" style:font-weight-asian="bold" style:font-weight-complex="bold"/>
    </style:style>
    <style:style style:name="P16" style:family="paragraph" style:parent-style-name="Standard" style:list-style-name="L1">
      <style:text-properties officeooo:rsid="00278307" officeooo:paragraph-rsid="00278307"/>
    </style:style>
    <style:style style:name="P17" style:family="paragraph" style:parent-style-name="Standard" style:list-style-name="L1">
      <style:paragraph-properties style:writing-mode="lr-tb" style:writing-mode-automatic="false"/>
      <style:text-properties officeooo:rsid="00278307" officeooo:paragraph-rsid="00278307"/>
    </style:style>
    <style:style style:name="P18" style:family="paragraph" style:parent-style-name="Standard">
      <style:paragraph-properties style:writing-mode="lr-tb" style:writing-mode-automatic="false"/>
      <style:text-properties officeooo:rsid="00278307" officeooo:paragraph-rsid="00278307"/>
    </style:style>
    <style:style style:name="P19" style:family="paragraph" style:parent-style-name="Standard">
      <style:paragraph-properties style:writing-mode="lr-tb" style:writing-mode-automatic="false"/>
      <style:text-properties officeooo:rsid="00ad52b6" officeooo:paragraph-rsid="00ad52b6"/>
    </style:style>
    <style:style style:name="P20" style:family="paragraph" style:parent-style-name="Standard">
      <style:paragraph-properties style:writing-mode="lr-tb" style:writing-mode-automatic="false"/>
      <style:text-properties officeooo:paragraph-rsid="00314267"/>
    </style:style>
    <style:style style:name="P21" style:family="paragraph" style:parent-style-name="Standard">
      <style:paragraph-properties style:writing-mode="lr-tb" style:writing-mode-automatic="false"/>
      <style:text-properties officeooo:rsid="00314267" officeooo:paragraph-rsid="00314267"/>
    </style:style>
    <style:style style:name="P22" style:family="paragraph" style:parent-style-name="Standard">
      <style:paragraph-properties style:writing-mode="lr-tb" style:writing-mode-automatic="false"/>
      <style:text-properties officeooo:rsid="0038b88d" officeooo:paragraph-rsid="0038b88d"/>
    </style:style>
    <style:style style:name="P23" style:family="paragraph" style:parent-style-name="Standard" style:list-style-name="L2">
      <style:paragraph-properties style:writing-mode="lr-tb" style:writing-mode-automatic="false"/>
      <style:text-properties officeooo:rsid="00586717" officeooo:paragraph-rsid="009271eb"/>
    </style:style>
    <style:style style:name="P24" style:family="paragraph" style:parent-style-name="Standard" style:list-style-name="L2">
      <style:paragraph-properties style:writing-mode="lr-tb" style:writing-mode-automatic="false"/>
      <style:text-properties officeooo:rsid="00938f2e" officeooo:paragraph-rsid="00938f2e"/>
    </style:style>
    <style:style style:name="P25" style:family="paragraph" style:parent-style-name="Standard" style:list-style-name="L2">
      <style:paragraph-properties style:writing-mode="lr-tb" style:writing-mode-automatic="false"/>
      <style:text-properties officeooo:rsid="005af8dd" officeooo:paragraph-rsid="005af8dd"/>
    </style:style>
    <style:style style:name="P26" style:family="paragraph" style:parent-style-name="Standard">
      <style:paragraph-properties style:writing-mode="lr-tb" style:writing-mode-automatic="false"/>
      <style:text-properties officeooo:rsid="004499b8" officeooo:paragraph-rsid="00601e6b"/>
    </style:style>
    <style:style style:name="P27" style:family="paragraph" style:parent-style-name="Standard">
      <style:paragraph-properties style:writing-mode="lr-tb" style:writing-mode-automatic="false"/>
      <style:text-properties officeooo:rsid="004499b8" officeooo:paragraph-rsid="004499b8"/>
    </style:style>
    <style:style style:name="P28" style:family="paragraph" style:parent-style-name="Standard">
      <style:paragraph-properties style:writing-mode="lr-tb" style:writing-mode-automatic="false"/>
      <style:text-properties officeooo:rsid="004cf3bd" officeooo:paragraph-rsid="00506745"/>
    </style:style>
    <style:style style:name="P29" style:family="paragraph" style:parent-style-name="Standard" style:list-style-name="L3">
      <style:paragraph-properties style:writing-mode="lr-tb" style:writing-mode-automatic="false"/>
      <style:text-properties officeooo:rsid="004ec52f" officeooo:paragraph-rsid="00506745"/>
    </style:style>
    <style:style style:name="P30" style:family="paragraph" style:parent-style-name="Standard" style:list-style-name="L3">
      <style:paragraph-properties style:writing-mode="lr-tb" style:writing-mode-automatic="false"/>
      <style:text-properties officeooo:rsid="00506745" officeooo:paragraph-rsid="00506745"/>
    </style:style>
    <style:style style:name="P31" style:family="paragraph" style:parent-style-name="Standard">
      <style:paragraph-properties style:writing-mode="lr-tb" style:writing-mode-automatic="false"/>
      <style:text-properties officeooo:paragraph-rsid="00506745"/>
    </style:style>
    <style:style style:name="P32" style:family="paragraph" style:parent-style-name="Standard">
      <style:paragraph-properties style:writing-mode="lr-tb" style:writing-mode-automatic="false"/>
      <style:text-properties officeooo:paragraph-rsid="004ec52f"/>
    </style:style>
    <style:style style:name="P33" style:family="paragraph" style:parent-style-name="Standard">
      <style:paragraph-properties style:writing-mode="lr-tb" style:writing-mode-automatic="false"/>
      <style:text-properties officeooo:rsid="0053bfd4" officeooo:paragraph-rsid="0053bfd4"/>
    </style:style>
    <style:style style:name="P34" style:family="paragraph" style:parent-style-name="Standard" style:list-style-name="L4">
      <style:paragraph-properties style:writing-mode="lr-tb" style:writing-mode-automatic="false"/>
      <style:text-properties officeooo:rsid="005f327a" officeooo:paragraph-rsid="005f327a"/>
    </style:style>
    <style:style style:name="P35" style:family="paragraph" style:parent-style-name="Standard" style:list-style-name="L4">
      <style:paragraph-properties style:writing-mode="lr-tb" style:writing-mode-automatic="false"/>
      <style:text-properties officeooo:rsid="00938f2e" officeooo:paragraph-rsid="00938f2e"/>
    </style:style>
    <style:style style:name="P36" style:family="paragraph" style:parent-style-name="Standard" style:list-style-name="L4">
      <style:paragraph-properties style:writing-mode="lr-tb" style:writing-mode-automatic="false"/>
      <style:text-properties officeooo:paragraph-rsid="005f327a"/>
    </style:style>
    <style:style style:name="P37" style:family="paragraph" style:parent-style-name="Standard">
      <style:paragraph-properties style:writing-mode="lr-tb" style:writing-mode-automatic="false"/>
      <style:text-properties officeooo:rsid="005f327a" officeooo:paragraph-rsid="005f327a"/>
    </style:style>
    <style:style style:name="P38" style:family="paragraph" style:parent-style-name="Standard">
      <style:paragraph-properties style:writing-mode="lr-tb" style:writing-mode-automatic="false"/>
      <style:text-properties officeooo:paragraph-rsid="00601e6b"/>
    </style:style>
    <style:style style:name="P39" style:family="paragraph" style:parent-style-name="Standard" style:list-style-name="L5">
      <style:paragraph-properties style:writing-mode="lr-tb" style:writing-mode-automatic="false"/>
      <style:text-properties officeooo:rsid="00640036" officeooo:paragraph-rsid="00640036"/>
    </style:style>
    <style:style style:name="P40" style:family="paragraph" style:parent-style-name="Standard">
      <style:paragraph-properties style:writing-mode="lr-tb" style:writing-mode-automatic="false"/>
      <style:text-properties officeooo:rsid="00640036" officeooo:paragraph-rsid="00640036"/>
    </style:style>
    <style:style style:name="P41" style:family="paragraph" style:parent-style-name="Standard">
      <style:paragraph-properties style:writing-mode="lr-tb" style:writing-mode-automatic="false"/>
      <style:text-properties officeooo:paragraph-rsid="00640036"/>
    </style:style>
    <style:style style:name="P42" style:family="paragraph" style:parent-style-name="Standard">
      <style:paragraph-properties style:writing-mode="lr-tb" style:writing-mode-automatic="false"/>
      <style:text-properties officeooo:rsid="0065e9d4" officeooo:paragraph-rsid="00789a2e"/>
    </style:style>
    <style:style style:name="P43" style:family="paragraph" style:parent-style-name="Standard">
      <style:paragraph-properties style:writing-mode="lr-tb" style:writing-mode-automatic="false"/>
      <style:text-properties officeooo:rsid="0095f2e3" officeooo:paragraph-rsid="0095f2e3"/>
    </style:style>
    <style:style style:name="T1" style:family="text">
      <style:text-properties fo:color="#127622" loext:opacity="100%"/>
    </style:style>
    <style:style style:name="T2" style:family="text">
      <style:text-properties officeooo:rsid="009bbe84"/>
    </style:style>
    <style:style style:name="T3" style:family="text">
      <style:text-properties officeooo:rsid="00991caa"/>
    </style:style>
    <style:style style:name="T4" style:family="text">
      <style:text-properties officeooo:rsid="00af1305"/>
    </style:style>
    <style:style style:name="T5" style:family="text">
      <style:text-properties officeooo:rsid="00abe328"/>
    </style:style>
    <style:style style:name="T6" style:family="text">
      <style:text-properties officeooo:rsid="001f67da"/>
    </style:style>
    <style:style style:name="T7" style:family="text">
      <style:text-properties officeooo:rsid="002eb8cf"/>
    </style:style>
    <style:style style:name="T8" style:family="text">
      <style:text-properties officeooo:rsid="00203abf"/>
    </style:style>
    <style:style style:name="T9" style:family="text">
      <style:text-properties officeooo:rsid="00afb233"/>
    </style:style>
    <style:style style:name="T10" style:family="text">
      <style:text-properties fo:color="#127622" loext:opacity="100%" officeooo:rsid="001d1cc6"/>
    </style:style>
    <style:style style:name="T11" style:family="text">
      <style:text-properties officeooo:rsid="0021651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314267"/>
    </style:style>
    <style:style style:name="T14" style:family="text">
      <style:text-properties fo:color="#127622" loext:opacity="100%" officeooo:rsid="00314267"/>
    </style:style>
    <style:style style:name="T15" style:family="text">
      <style:text-properties fo:font-style="italic" officeooo:rsid="00314267" style:font-style-asian="italic" style:font-style-complex="italic"/>
    </style:style>
    <style:style style:name="T16" style:family="text">
      <style:text-properties fo:background-color="#fff5ce" loext:char-shading-value="0"/>
    </style:style>
    <style:style style:name="T17" style:family="text">
      <style:text-properties fo:background-color="#ffff00" loext:char-shading-value="0"/>
    </style:style>
    <style:style style:name="T18" style:family="text">
      <style:text-properties style:text-position="super 58%"/>
    </style:style>
    <style:style style:name="T19" style:family="text">
      <style:text-properties officeooo:rsid="00597668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4ab026"/>
    </style:style>
    <style:style style:name="T22" style:family="text">
      <style:text-properties fo:color="#127622" loext:opacity="100%" officeooo:rsid="004ab026"/>
    </style:style>
    <style:style style:name="T23" style:family="text">
      <style:text-properties officeooo:rsid="004c0305"/>
    </style:style>
    <style:style style:name="T24" style:family="text">
      <style:text-properties style:text-position="super 58%" officeooo:rsid="004499b8"/>
    </style:style>
    <style:style style:name="T25" style:family="text">
      <style:text-properties officeooo:rsid="004499b8"/>
    </style:style>
    <style:style style:name="T26" style:family="text">
      <style:text-properties fo:font-weight="bold" fo:background-color="#ffff00" loext:char-shading-value="0" style:font-weight-asian="bold" style:font-weight-complex="bold"/>
    </style:style>
    <style:style style:name="T27" style:family="text">
      <style:text-properties officeooo:rsid="00506745"/>
    </style:style>
    <style:style style:name="T28" style:family="text">
      <style:text-properties officeooo:rsid="00497f00"/>
    </style:style>
    <style:style style:name="T29" style:family="text">
      <style:text-properties fo:font-weight="bold" officeooo:rsid="00497f00" style:font-weight-asian="bold" style:font-weight-complex="bold"/>
    </style:style>
    <style:style style:name="T30" style:family="text">
      <style:text-properties officeooo:rsid="005e5792"/>
    </style:style>
    <style:style style:name="T31" style:family="text">
      <style:text-properties officeooo:rsid="00b757c3"/>
    </style:style>
    <style:style style:name="T32" style:family="text">
      <style:text-properties fo:font-weight="bold" officeooo:rsid="00b757c3" style:font-weight-asian="bold" style:font-weight-complex="bold"/>
    </style:style>
    <style:style style:name="T33" style:family="text">
      <style:text-properties officeooo:rsid="00b818cc"/>
    </style:style>
    <style:style style:name="T34" style:family="text">
      <style:text-properties fo:color="#127622" loext:opacity="100%" officeooo:rsid="00b95625"/>
    </style:style>
    <style:style style:name="T35" style:family="text">
      <style:text-properties officeooo:rsid="00b95625"/>
    </style:style>
    <style:style style:name="T36" style:family="text">
      <style:text-properties fo:color="#127622" loext:opacity="100%" officeooo:rsid="00b757c3"/>
    </style:style>
    <style:style style:name="T37" style:family="text">
      <style:text-properties officeooo:rsid="0071f089"/>
    </style:style>
    <style:style style:name="T38" style:family="text">
      <style:text-properties officeooo:rsid="0045df30"/>
    </style:style>
    <style:style style:name="T39" style:family="text">
      <style:text-properties officeooo:rsid="00726728"/>
    </style:style>
    <style:style style:name="T40" style:family="text">
      <style:text-properties fo:font-style="italic" officeooo:rsid="0045df30" style:font-style-asian="italic" style:font-style-complex="italic"/>
    </style:style>
    <style:style style:name="T41" style:family="text">
      <style:text-properties fo:font-style="italic" officeooo:rsid="0047ae22" style:font-style-asian="italic" style:font-style-complex="italic"/>
    </style:style>
    <style:style style:name="T42" style:family="text">
      <style:text-properties officeooo:rsid="0074662a"/>
    </style:style>
    <style:style style:name="T43" style:family="text">
      <style:text-properties fo:font-style="italic" officeooo:rsid="00497f00" style:font-style-asian="italic" style:font-style-complex="italic"/>
    </style:style>
    <style:style style:name="T44" style:family="text">
      <style:text-properties officeooo:rsid="0055aad3"/>
    </style:style>
    <style:style style:name="T45" style:family="text">
      <style:text-properties officeooo:rsid="00ba5c03"/>
    </style:style>
    <style:style style:name="T46" style:family="text">
      <style:text-properties officeooo:rsid="005f327a"/>
    </style:style>
    <style:style style:name="T47" style:family="text">
      <style:text-properties officeooo:rsid="00756bcb"/>
    </style:style>
    <style:style style:name="T48" style:family="text">
      <style:text-properties fo:font-style="italic" officeooo:rsid="00756bcb" style:font-style-asian="italic" style:font-style-complex="italic"/>
    </style:style>
    <style:style style:name="T49" style:family="text">
      <style:text-properties fo:font-style="italic" officeooo:rsid="005f327a" style:font-style-asian="italic" style:font-style-complex="italic"/>
    </style:style>
    <style:style style:name="T50" style:family="text">
      <style:text-properties officeooo:rsid="00601e6b"/>
    </style:style>
    <style:style style:name="T51" style:family="text">
      <style:text-properties officeooo:rsid="0080ae75"/>
    </style:style>
    <style:style style:name="T52" style:family="text">
      <style:text-properties officeooo:rsid="0063602f"/>
    </style:style>
    <style:style style:name="T53" style:family="text">
      <style:text-properties fo:color="#127622" loext:opacity="100%" officeooo:rsid="00601e6b"/>
    </style:style>
    <style:style style:name="T54" style:family="text">
      <style:text-properties officeooo:rsid="00640036"/>
    </style:style>
    <style:style style:name="T55" style:family="text">
      <style:text-properties fo:font-weight="bold" officeooo:rsid="00640036" style:font-weight-asian="bold" style:font-weight-complex="bold"/>
    </style:style>
    <style:style style:name="T56" style:family="text">
      <style:text-properties officeooo:rsid="00650709"/>
    </style:style>
    <style:style style:name="T57" style:family="text">
      <style:text-properties officeooo:rsid="00845fec"/>
    </style:style>
    <style:style style:name="T58" style:family="text">
      <style:text-properties fo:font-weight="bold" officeooo:rsid="00650709" style:font-weight-asian="bold" style:font-weight-complex="bold"/>
    </style:style>
    <style:style style:name="T59" style:family="text">
      <style:text-properties officeooo:rsid="0086458a"/>
    </style:style>
    <style:style style:name="T60" style:family="text">
      <style:text-properties officeooo:rsid="0067e37e"/>
    </style:style>
    <style:style style:name="T61" style:family="text">
      <style:text-properties officeooo:rsid="00bf7e79"/>
    </style:style>
    <style:style style:name="T62" style:family="text">
      <style:text-properties officeooo:rsid="00c181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57in" fo:text-indent="-0.25in" fo:margin-left="1.0457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57in" fo:text-indent="-0.25in" fo:margin-left="1.5457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57in" fo:text-indent="-0.25in" fo:margin-left="2.0457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57in" fo:text-indent="-0.25in" fo:margin-left="2.5457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en forcing harmony creates error</text:p>
      <text:p text:style-name="P2">Matthew 7:20</text:p>
      <text:p text:style-name="Standard"/>
      <text:p text:style-name="Standard"/>
      <text:p text:style-name="P3">In the post-resurrection timeline of Jesus Christ our Lord written of in all four gospels (<text:span text:style-name="T1">Matthew 28:16-20</text:span>, <text:span text:style-name="T1">Mark 16:14-20</text:span>, <text:span text:style-name="T1">Luke 24:36-53</text:span>, <text:span text:style-name="T1">John 20:19-25</text:span> &amp; <text:span text:style-name="T1">26-31</text:span>) the Lord visits the disciples on several occasions.</text:p>
      <text:p text:style-name="P3"/>
      <text:p text:style-name="P4">Many study Bibles and commentators appear to attempt to harmonize these accounts with each other in various fashions. <text:span text:style-name="T2">M</text:span><text:span text:style-name="T3">ost of them </text:span><text:span text:style-name="T2">do so </text:span><text:span text:style-name="T3">by explicitly listing or assuming that some are parallel passages </text:span><text:span text:style-name="T4">in their exegesis</text:span><text:span text:style-name="T3">. </text:span><text:span text:style-name="T5">And of course there’s nothing wrong with that in and of itself. The problems arises when we simply don’t check our Bible carefully enough.</text:span></text:p>
      <text:p text:style-name="P4"/>
      <text:p text:style-name="P5"><text:span text:style-name="T6">The </text:span><text:span text:style-name="T7">specific account</text:span><text:span text:style-name="T6"> we will be looking at today is when </text:span><text:span text:style-name="T8">any</text:span><text:span text:style-name="T6">one attempts to </text:span><text:span text:style-name="T9">assert that</text:span><text:span text:style-name="T6"> both </text:span><text:span text:style-name="T10">Luke 24:36-53</text:span> <text:span text:style-name="T6">and </text:span><text:span text:style-name="T10">John 20:19-25</text:span> (first visit) <text:span text:style-name="T11">are</text:span><text:span text:style-name="T6"> parallel passages.</text:span></text:p>
      <text:p text:style-name="P5"/>
      <text:p text:style-name="P6">Here are a few of the sources that either claim or assume that they are parallel passages:</text:p>
      <text:p text:style-name="P6"/>
      <text:list text:style-name="L1">
        <text:list-item>
          <text:p text:style-name="P7">Study Bibles</text:p>
          <text:list>
            <text:list-item>
              <text:p text:style-name="P8">The King James Study Bible</text:p>
            </text:list-item>
            <text:list-item>
              <text:p text:style-name="P8">The Scofield Reference Bible</text:p>
            </text:list-item>
            <text:list-item>
              <text:p text:style-name="P8">The Henry Morris Study Bible</text:p>
            </text:list-item>
            <text:list-item>
              <text:p text:style-name="P8">The Ryrie Study Bible</text:p>
            </text:list-item>
            <text:list-item>
              <text:p text:style-name="P9">The New Oxford Annotated Bible</text:p>
            </text:list-item>
            <text:list-item>
              <text:p text:style-name="P9">The Anchor Bible (Raymond Brown)</text:p>
            </text:list-item>
            <text:list-item>
              <text:p text:style-name="P9">The MacArthur Bible</text:p>
            </text:list-item>
            <text:list-item>
              <text:p text:style-name="P10">The Thompson Chain-Reference Bible</text:p>
            </text:list-item>
            <text:list-item>
              <text:p text:style-name="P10">ESV Study Bible</text:p>
            </text:list-item>
            <text:list-item>
              <text:p text:style-name="P10">The Reformation Study Bible</text:p>
            </text:list-item>
          </text:list>
        </text:list-item>
        <text:list-item>
          <text:p text:style-name="P7">Commentaries</text:p>
          <text:list>
            <text:list-item>
              <text:p text:style-name="P11">Matthew Henry</text:p>
            </text:list-item>
            <text:list-item>
              <text:p text:style-name="P11">John Gill</text:p>
            </text:list-item>
            <text:list-item>
              <text:p text:style-name="P11">Adam Clarke</text:p>
            </text:list-item>
            <text:list-item>
              <text:p text:style-name="P12">Jamieson, Fausset, and Brown (JFB)</text:p>
            </text:list-item>
          </text:list>
        </text:list-item>
        <text:list-item>
          <text:p text:style-name="P13">Other writings</text:p>
          <text:list>
            <text:list-item>
              <text:p text:style-name="P14">The Expositor’s Greek Testament</text:p>
            </text:list-item>
            <text:list-item>
              <text:p text:style-name="P14">Bengel’s Gnomon of the New Testament</text:p>
            </text:list-item>
          </text:list>
        </text:list-item>
        <text:list-item>
          <text:p text:style-name="P15">Historical writings</text:p>
          <text:list>
            <text:list-item>
              <text:p text:style-name="P16">Tatian’s Diatessaron (c. 160-175AD)</text:p>
            </text:list-item>
            <text:list-item>
              <text:p text:style-name="P17">Augustine of Hippo (<text:span text:style-name="T12">De consensu evangelistarum</text:span>)</text:p>
            </text:list-item>
            <text:list-item>
              <text:p text:style-name="P17">The Eusebian Canons</text:p>
            </text:list-item>
          </text:list>
        </text:list-item>
      </text:list>
      <text:p text:style-name="P18"/>
      <text:p text:style-name="P18"/>
      <text:p text:style-name="P19"/>
      <text:p text:style-name="P19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oft-page-break/><text:span text:style-name="T13">Our first stop is </text:span><text:span text:style-name="T14">John 20:24</text:span><text:span text:style-name="T13"> which identifies Thomas called Didymus as one of </text:span>“<text:span text:style-name="T15">the twelve</text:span>”.</text:p>
      <text:p text:style-name="P21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1">John 20:24</text:span><text:line-break/>But <text:span text:style-name="T16">Thomas, </text:span><text:span text:style-name="T17">one of the twelve</text:span><text:span text:style-name="T16">, called Didymus</text:span>, was not with them when Jesus came.</text:p>
          </table:table-cell>
        </table:table-row>
      </table:table>
      <text:p text:style-name="P21"/>
      <text:p text:style-name="P21"/>
      <text:p text:style-name="P22">And then we define the phrase “<text:span text:style-name="T12">the twelve</text:span>”:</text:p>
      <text:p text:style-name="P2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"><text:span text:style-name="T1">Matthew 10:2-4</text:span><text:line-break/><text:span text:style-name="T18">2</text:span> Now the names of <text:span text:style-name="T16">the twelve</text:span> apostles are these; The first, Simon, who is called Peter, and Andrew his brother; James the son of Zebedee, and John his brother;<text:line-break/><text:span text:style-name="T18">3</text:span> Philip, and Bartholomew; <text:span text:style-name="T17">Thomas</text:span>, and Matthew the publican; James the son of Alphaeus, and Lebbaeus, whose surname was Thaddaeus;<text:line-break/><text:span text:style-name="T18">4</text:span> Simon the Canaanite, and Judas Iscariot, who also betrayed him.</text:p>
          </table:table-cell>
          <table:table-cell table:style-name="Table2.A1" office:value-type="string">
            <text:p text:style-name="Table_20_Contents"><text:span text:style-name="T1">Mark 3:14-19</text:span><text:line-break/><text:span text:style-name="T18">14</text:span> And he ordained <text:span text:style-name="T16">twelve</text:span>, that they should be with him, and that he might send them forth to preach,<text:line-break/><text:span text:style-name="T18">15</text:span> And to have power to heal sicknesses, and to cast out devils:<text:line-break/><text:span text:style-name="T18">16</text:span> And Simon he surnamed Peter;<text:line-break/><text:span text:style-name="T18">17</text:span> And James the son of Zebedee, and John the brother of James; and he surnamed them Boanerges, which is, The sons of thunder:<text:line-break/><text:span text:style-name="T18">18</text:span> And Andrew, and Philip, and Bartholomew, and Matthew, and <text:span text:style-name="T17">Thomas</text:span>, and James the son of Alphaeus, and Thaddaeus, and Simon the Canaanite,<text:line-break/><text:span text:style-name="T18">19</text:span> And Judas Iscariot, which also betrayed him: and they went into an house.</text:p>
          </table:table-cell>
          <table:table-cell table:style-name="Table2.C1" office:value-type="string">
            <text:p text:style-name="Table_20_Contents"><text:span text:style-name="T1">Luke 6:13-16</text:span><text:line-break/><text:span text:style-name="T18">13</text:span> And when it was day, he called unto him his disciples: and of them he chose <text:span text:style-name="T16">twelve</text:span>, whom also he named apostles;<text:line-break/><text:span text:style-name="T18">14</text:span> Simon, (whom he also named Peter,) and Andrew his brother, James and John, Philip and Bartholomew,<text:line-break/><text:span text:style-name="T18">15</text:span> Matthew and <text:span text:style-name="T17">Thomas</text:span>, James the son of Alphaeus, and Simon called Zelotes,<text:line-break/><text:span text:style-name="T18">16</text:span> And Judas the brother of James, and Judas Iscariot, which also was the traitor.</text:p>
          </table:table-cell>
        </table:table-row>
      </table:table>
      <text:list text:style-name="L2">
        <text:list-item>
          <text:p text:style-name="P23">The Bible defines “<text:span text:style-name="T12">the twelve</text:span>” as twelve distinct men <text:span text:style-name="T19">and nothing else.</text:span></text:p>
          <text:list>
            <text:list-item>
              <text:p text:style-name="P24">There is zero evidence <text:span text:style-name="T20">from the Bible</text:span> to suggest it ever means anything else.</text:p>
            </text:list-item>
          </text:list>
        </text:list-item>
        <text:list-item>
          <text:p text:style-name="P25">Thomas called Didymus is one of those twelve men.</text:p>
        </text:list-item>
      </text:list>
      <text:p text:style-name="P21"/>
      <text:p text:style-name="P26">Now, if we look carefully at the <text:span text:style-name="T1">Luke</text:span><text:span text:style-name="T21"> </text:span>account <text:span text:style-name="T21">(</text:span><text:span text:style-name="T22">Luke 24:36-53</text:span><text:span text:style-name="T21">)</text:span> we <text:span text:style-name="T23">will </text:span>notice something very interesting in the preceding verses:</text:p>
      <text:p text:style-name="P27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T1">Luke 24:33</text:span><text:line-break/>And they <text:span text:style-name="T24">[the two disciples that went to Emmaus]</text:span><text:span text:style-name="T25"> </text:span>rose up the same hour, and returned to Jerusalem, and found <text:span text:style-name="T26">the eleven</text:span> <text:span text:style-name="T17">gathered together</text:span>, <text:span text:style-name="T16">and them that were with them</text:span>,</text:p>
          </table:table-cell>
        </table:table-row>
      </table:table>
      <text:p text:style-name="P27"/>
      <text:p text:style-name="P28">This verse is critical because it describes who is present when Jesus appears in this account:</text:p>
      <text:list text:style-name="L3">
        <text:list-item>
          <text:p text:style-name="P29"><text:span text:style-name="T27">T</text:span>he two disciples from Emmaus.</text:p>
        </text:list-item>
        <text:list-item>
          <text:p text:style-name="P30">The eleven.</text:p>
        </text:list-item>
        <text:list-item>
          <text:p text:style-name="P30">Them that were with the eleven.</text:p>
        </text:list-item>
      </text:list>
      <text:p text:style-name="P31"/>
      <text:p text:style-name="P31"><text:span text:style-name="T28">This precise point is where many commentators diverge in </text:span><text:span text:style-name="T29">their opinion</text:span><text:span text:style-name="T28"> on what the Bible says. </text:span><text:span text:style-name="T30">A</text:span><text:span text:style-name="T28">nd so it is necessarily a critical </text:span><text:span text:style-name="T31">point</text:span><text:span text:style-name="T28"> where one has to decide whether to take the Bible literally or not. </text:span><text:span text:style-name="T31">My suggestion is that you set aside all human </text:span><text:span text:style-name="T32">opinions</text:span><text:span text:style-name="T31"> and instead submit </text:span><text:span text:style-name="T33">yourself </text:span><text:span text:style-name="T31">to the only reliable discerner between truth and error (</text:span><text:span text:style-name="T34">1Cor 2:14</text:span><text:span text:style-name="T35">, </text:span><text:span text:style-name="T36">Hebrew 4:12</text:span><text:span text:style-name="T31">).</text:span></text:p>
      <text:p text:style-name="P27"/>
      <text:p text:style-name="P27"/>
      <text:p text:style-name="P27"/>
      <text:p text:style-name="P32"><text:soft-page-break/><text:span text:style-name="T37">W</text:span><text:span text:style-name="T38">hen </text:span><text:span text:style-name="T39">those</text:span><text:span text:style-name="T38"> two disciples returned </text:span><text:span text:style-name="T39">from Emmaus </text:span><text:span text:style-name="T38">they found </text:span>“<text:span text:style-name="T40">the eleven </text:span><text:span text:style-name="T41">gathered together</text:span>”. <text:span text:style-name="T28">Who exactly </text:span><text:span text:style-name="T42">are</text:span><text:span text:style-name="T28"> “</text:span><text:span text:style-name="T43">the eleven</text:span><text:span text:style-name="T28">”?</text:span></text:p>
      <text:p text:style-name="P32"/>
      <text:p text:style-name="P33">The phrase “<text:span text:style-name="T12">the eleven</text:span>” appears exactly <text:span text:style-name="T44">six</text:span> times in <text:span text:style-name="T44">six</text:span> verses in the New Testament.</text:p>
      <text:p text:style-name="P33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span text:style-name="T1">Matthew 28:16</text:span><text:line-break/>Then <text:span text:style-name="T17">the eleven</text:span> disciples went away into Galilee, into a mountain where Jesus had appointed them.</text:p>
          </table:table-cell>
        </table:table-row>
        <table:table-row>
          <table:table-cell table:style-name="Table4.A2" office:value-type="string">
            <text:p text:style-name="Table_20_Contents"><text:span text:style-name="T1">Mark 16:14</text:span><text:line-break/>Afterward he appeared unto <text:span text:style-name="T17">the eleven</text:span> as they sat at meat, and upbraided them with their unbelief and hardness of heart, because they believed not them which had seen him after he was risen.</text:p>
          </table:table-cell>
        </table:table-row>
        <table:table-row>
          <table:table-cell table:style-name="Table4.A2" office:value-type="string">
            <text:p text:style-name="Table_20_Contents"><text:span text:style-name="T1">Luke 24:9</text:span><text:line-break/>And returned from the sepulchre, and told all these things unto <text:span text:style-name="T17">the eleven</text:span>, and to all the rest.</text:p>
          </table:table-cell>
        </table:table-row>
        <table:table-row>
          <table:table-cell table:style-name="Table4.A2" office:value-type="string">
            <text:p text:style-name="Table_20_Contents"><text:span text:style-name="T1">Luke 24:33</text:span><text:line-break/>And they rose up the same hour, and returned to Jerusalem, and found <text:span text:style-name="T17">the eleven</text:span> gathered together, and them that were with them,</text:p>
          </table:table-cell>
        </table:table-row>
        <table:table-row>
          <table:table-cell table:style-name="Table4.A2" office:value-type="string">
            <text:p text:style-name="Table_20_Contents"><text:span text:style-name="T1">Acts 1:26</text:span><text:line-break/>And they gave forth their lots; and the lot fell upon Matthias; and he was numbered with <text:span text:style-name="T17">the eleven</text:span> apostles.</text:p>
          </table:table-cell>
        </table:table-row>
        <table:table-row>
          <table:table-cell table:style-name="Table4.A2" office:value-type="string">
            <text:p text:style-name="Table_20_Contents"><text:span text:style-name="T1">Acts 2:14</text:span><text:line-break/>But Peter, standing up with <text:span text:style-name="T17">the eleven</text:span>, lifted up his voice, and said unto them, Ye men of Judaea, and all ye that dwell at Jerusalem, be this known unto you, and hearken to my words:</text:p>
          </table:table-cell>
        </table:table-row>
      </table:table>
      <text:list text:style-name="L4">
        <text:list-item>
          <text:p text:style-name="P34">Every usage of “<text:span text:style-name="T12">the eleven</text:span>” is equivalent to “<text:span text:style-name="T12">the twelve</text:span>” <text:span text:style-name="T20">excluding</text:span> Judas Iscariot.</text:p>
          <text:list>
            <text:list-item>
              <text:p text:style-name="P35">There is zero evidence <text:span text:style-name="T20">from the Bible</text:span> to suggest it ever means anything else <text:span text:style-name="T45">so where did some of the other sources get this idea?</text:span></text:p>
            </text:list-item>
          </text:list>
        </text:list-item>
        <text:list-item>
          <text:p text:style-name="P36"><text:span text:style-name="T46">That means that Thomas called Didymus is </text:span><text:span text:style-name="T47">both one of “</text:span><text:span text:style-name="T48">the twelve</text:span>”<text:span text:style-name="T47"> and </text:span><text:span text:style-name="T46">one of “</text:span><text:span text:style-name="T49">the eleven</text:span><text:span text:style-name="T46">”.</text:span></text:p>
        </text:list-item>
      </text:list>
      <text:p text:style-name="P37"/>
      <text:p text:style-name="P37"/>
      <text:p text:style-name="P38"><text:span text:style-name="T50">So why </text:span><text:span text:style-name="T51">are all these simple facts </text:span><text:span text:style-name="T50">so important? If we look </text:span><text:span text:style-name="T52">very carefully near</text:span><text:span text:style-name="T50"> the </text:span><text:span text:style-name="T52">end of the first visit in the </text:span><text:span text:style-name="T53">John</text:span><text:span text:style-name="T50"> </text:span>account <text:span text:style-name="T50">(</text:span><text:span text:style-name="T10">John 20:19-25</text:span>) <text:span text:style-name="T52">we see the following:</text:span></text:p>
      <text:p text:style-name="P38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span text:style-name="T1">John 20:24</text:span><text:line-break/>But Thomas, one of the twelve, called Didymus, <text:span text:style-name="T17">was not with them when Jesus came</text:span>.</text:p>
          </table:table-cell>
        </table:table-row>
      </table:table>
      <text:list text:style-name="L5">
        <text:list-item>
          <text:p text:style-name="P39">Thomas called Didymus <text:span text:style-name="T20">was not there</text:span> for the first visit in <text:span text:style-name="T1">John 20</text:span>.</text:p>
        </text:list-item>
      </text:list>
      <text:p text:style-name="P40"/>
      <text:p text:style-name="P40"/>
      <text:p text:style-name="P41"><text:span text:style-name="T54">To summarize, Thomas </text:span><text:span text:style-name="T55">was</text:span><text:span text:style-name="T54"> there in </text:span><text:span text:style-name="T10">Luke 24:36-53</text:span><text:span text:style-name="T54"> </text:span><text:span text:style-name="T6">and </text:span><text:span text:style-name="T54">he </text:span><text:span text:style-name="T55">was not</text:span><text:span text:style-name="T54"> there in</text:span><text:span text:style-name="T6"> </text:span><text:span text:style-name="T10">John 20:19-25</text:span>. <text:span text:style-name="T56">This very </text:span><text:span text:style-name="T57">simple fact</text:span><text:span text:style-name="T56"> teaches us that they </text:span><text:span text:style-name="T58">are not</text:span><text:span text:style-name="T56"> parallel passages.</text:span></text:p>
      <text:p text:style-name="P41"/>
      <text:p text:style-name="P42">Some commentators attempt to “force <text:span text:style-name="T59">the </text:span>harmony” of these <text:span text:style-name="T60">two </text:span>accounts by asserting that the phrase “<text:span text:style-name="T12">the eleven</text:span>” is <text:span text:style-name="T20">figurative</text:span> and <text:span text:style-name="T61">doesn’t mean “all of the eleven disciples”. Unfortunately, there is no Biblical evidence to support that assertio</text:span><text:span text:style-name="T62">n.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>Side note: as a consequence of what we have learned we also learn that <text:span text:style-name="T1">John 21:14</text:span>’s “<text:span text:style-name="T12">third time</text:span>” count is constrained to the book of <text:span text:style-name="T1">John</text:span> and is not a total across the gospel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5T08:30:25.641947300</meta:creation-date>
    <dc:title>default</dc:title>
    <meta:editing-duration>PT2H57M57S</meta:editing-duration>
    <meta:editing-cycles>165</meta:editing-cycles>
    <meta:generator>LibreOffice/26.2.2.2$Windows_X86_64 LibreOffice_project/1f77d10d6938fd34972958f64b2bcfa54f8b1ba5</meta:generator>
    <dc:date>2026-05-04T08:47:21.444095900</dc:date>
    <meta:document-statistic meta:table-count="5" meta:image-count="0" meta:object-count="0" meta:page-count="3" meta:paragraph-count="62" meta:word-count="1125" meta:character-count="6310" meta:non-whitespace-character-count="5280"/>
    <meta:template xlink:type="simple" xlink:actuate="onRequest" xlink:title="default" xlink:href="../../../../AppData/Roaming/LibreOffice/4/user/template/default1.ott" meta:date="2026-04-15T08:30:25.500886800"/>
  </office:meta>
</office:document-meta>
</file>