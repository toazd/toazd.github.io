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fo:break-before="page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014in" fo:margin-left="0in" table:align="left"/>
    </style:style>
    <style:style style:name="Table2.A" style:family="table-column">
      <style:table-column-properties style:column-width="0.7806in"/>
    </style:style>
    <style:style style:name="Table2.B" style:family="table-column">
      <style:table-column-properties style:column-width="7.1208in"/>
    </style:style>
    <style:style style:name="Table2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2.B1" style:family="table-cell">
      <style:table-cell-properties style:vertical-align="middle" fo:padding="0.0313in" fo:border="0.75pt solid #000000"/>
    </style:style>
    <style:style style:name="Table2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2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Table_20_Contents">
      <style:text-properties fo:color="#127622" loext:opacity="100%" style:text-position="0% 100%" style:font-name="Liberation Sans" fo:font-size="12pt" officeooo:paragraph-rsid="001263c3" style:font-size-asian="12pt" style:font-size-complex="12pt"/>
    </style:style>
    <style:style style:name="P2" style:family="paragraph" style:parent-style-name="Table_20_Contents">
      <style:text-properties style:font-name="Liberation Sans" fo:font-size="12pt" officeooo:paragraph-rsid="001263c3" style:font-size-asian="12pt" style:font-size-complex="12pt"/>
    </style:style>
    <style:style style:name="P3" style:family="paragraph" style:parent-style-name="Table_20_Contents">
      <style:text-properties style:font-name="Liberation Sans" fo:font-size="12pt" officeooo:paragraph-rsid="00191ce9" style:font-size-asian="12pt" style:font-size-complex="12pt"/>
    </style:style>
    <style:style style:name="P4" style:family="paragraph" style:parent-style-name="Standard" style:list-style-name="L1">
      <style:text-properties style:font-name="Liberation Sans" fo:font-size="12pt" officeooo:rsid="001455a8" officeooo:paragraph-rsid="001455a8" style:font-size-asian="12pt" style:font-size-complex="12pt"/>
    </style:style>
    <style:style style:name="P5" style:family="paragraph" style:parent-style-name="Standard">
      <style:text-properties style:font-name="Liberation Sans" fo:font-size="12pt" officeooo:rsid="001455a8" officeooo:paragraph-rsid="001455a8" style:font-size-asian="12pt" style:font-size-complex="12pt"/>
    </style:style>
    <style:style style:name="P6" style:family="paragraph" style:parent-style-name="Standard">
      <style:text-properties style:font-name="Liberation Sans" fo:font-size="12pt" officeooo:rsid="001d8746" officeooo:paragraph-rsid="001d8746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font-style="normal" style:text-underline-style="solid" style:text-underline-width="auto" style:text-underline-color="font-color" fo:font-weight="normal" officeooo:rsid="001455a8" officeooo:paragraph-rsid="001455a8" style:font-size-asian="12pt" style:font-size-complex="1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127630" loext:opacity="100%" style:font-name="Liberation Sans" fo:font-size="12pt" fo:font-style="normal" fo:font-weight="normal" style:font-size-asian="12pt" style:font-size-complex="12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T1" style:family="text">
      <style:text-properties style:text-position="33% 8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underline-style="solid" style:text-underline-width="auto" style:text-underline-color="font-color" fo:background-color="#fff5ce" loext:char-shading-value="0"/>
    </style:style>
    <style:style style:name="T4" style:family="text">
      <style:text-properties style:text-position="super 58%" officeooo:rsid="00191ce9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dbb6" loext:char-shading-value="0"/>
    </style:style>
    <style:style style:name="T7" style:family="text">
      <style:text-properties style:text-underline-style="solid" style:text-underline-width="auto" style:text-underline-color="font-color" fo:background-color="#ffdbb6" loext:char-shading-value="0"/>
    </style:style>
    <style:style style:name="T8" style:family="text">
      <style:text-properties officeooo:rsid="0019b278"/>
    </style:style>
    <style:style style:name="T9" style:family="text">
      <style:text-properties fo:background-color="#fffb00" loext:char-shading-value="0" loext:padding="0.0193in" loext:border="0.74pt solid #d8c7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Leviticus 12:2-5</text:p>
            <text:p text:style-name="P2"><text:span text:style-name="T1">2</text:span> Speak unto the children of Israel, saying, If a woman have conceived seed, and <text:span text:style-name="T2">born a man child</text:span>: then she shall be unclean seven days; according to the days of the separation for her infirmity shall she be unclean.</text:p>
            <text:p text:style-name="P2"><text:span text:style-name="T1">3</text:span> And in the eighth day the flesh of his foreskin shall be circumcised.</text:p>
            <text:p text:style-name="P2"><text:span text:style-name="T1">4</text:span> And she shall then continue in <text:span text:style-name="T2">the blood </text:span><text:span text:style-name="T3">of her purifying</text:span><text:span text:style-name="T4">H2893 (feminine of H2892)</text:span><text:span text:style-name="T5"> </text:span><text:span text:style-name="T2">three and thirty days</text:span>; she shall touch no hallowed thing, nor come into the sanctuary, until the days of her purifying be fulfilled.</text:p>
            <text:p text:style-name="P3"><text:span text:style-name="T1">5</text:span> But if she <text:span text:style-name="T6">bear a maid child</text:span>, then she shall be unclean two weeks, as in her separation: and she shall continue in <text:span text:style-name="T6">the blood </text:span><text:span text:style-name="T7">of her purifying</text:span><text:span text:style-name="T4">H2893 (feminine of H2892)</text:span><text:span text:style-name="T5"> </text:span><text:span text:style-name="T6">threescore and six days</text:span>.</text:p>
          </table:table-cell>
        </table:table-row>
      </table:table>
      <text:list text:style-name="L1">
        <text:list-item>
          <text:p text:style-name="P4">Man child 33 days.</text:p>
          <text:list>
            <text:list-item>
              <text:p text:style-name="P4">Jesus’ ministry lasted 33 years<text:span text:style-name="T8">.</text:span></text:p>
            </text:list-item>
          </text:list>
        </text:list-item>
        <text:list-item>
          <text:p text:style-name="P4">Maid child 66 days.</text:p>
          <text:list>
            <text:list-item>
              <text:p text:style-name="P4">There are 66 books in the Bible<text:span text:style-name="T8">.</text:span></text:p>
            </text:list-item>
          </text:list>
        </text:list-item>
      </text:list>
      <text:p text:style-name="P5"/>
      <text:p text:style-name="P6">The new testament equivalent of H2893/H2892 appears to be G2512:</text:p>
      <text:p text:style-name="P6"/>
      <text:p text:style-name="P7">Search results for "G2512"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ar 1:44</text:p>
          </table:table-cell>
          <table:table-cell table:style-name="Table2.B1" office:value-type="string">
            <text:p text:style-name="P9">And saith unto him, See thou say nothing to any man: but go thy way, shew thyself to the priest, and offer for thy <text:span text:style-name="T9">cleansingG2512</text:span> those things which Moses commanded, for a testimony unto them.</text:p>
          </table:table-cell>
        </table:table-row>
        <table:table-row>
          <table:table-cell table:style-name="Table2.A2" office:value-type="string">
            <text:p text:style-name="P8">Luk 2:22</text:p>
          </table:table-cell>
          <table:table-cell table:style-name="Table2.B2" office:value-type="string">
            <text:p text:style-name="P9">And when the days of her <text:span text:style-name="T9">purificationG2512</text:span> according to the law of Moses were accomplished, they brought him to Jerusalem, to present him to the Lord;</text:p>
          </table:table-cell>
        </table:table-row>
        <table:table-row>
          <table:table-cell table:style-name="Table2.A2" office:value-type="string">
            <text:p text:style-name="P8">Luk 5:14</text:p>
          </table:table-cell>
          <table:table-cell table:style-name="Table2.B2" office:value-type="string">
            <text:p text:style-name="P9">And he charged him to tell no man: but go, and shew thyself to the priest, and offer for thy <text:span text:style-name="T9">cleansingG2512</text:span>, according as Moses commanded, for a testimony unto them.</text:p>
          </table:table-cell>
        </table:table-row>
        <table:table-row>
          <table:table-cell table:style-name="Table2.A2" office:value-type="string">
            <text:p text:style-name="P8">Joh 2:6</text:p>
          </table:table-cell>
          <table:table-cell table:style-name="Table2.B2" office:value-type="string">
            <text:p text:style-name="P9">And there were set there six waterpots of stone, after <text:span text:style-name="T9">the manner of the purifyingG2512</text:span> of the Jews, containing two or three firkins apiece.</text:p>
          </table:table-cell>
        </table:table-row>
        <table:table-row>
          <table:table-cell table:style-name="Table2.A2" office:value-type="string">
            <text:p text:style-name="P8">Joh 3:25</text:p>
          </table:table-cell>
          <table:table-cell table:style-name="Table2.B2" office:value-type="string">
            <text:p text:style-name="P9">Then there arose a question between some of John's disciples and the Jews about <text:span text:style-name="T9">purifyingG2512</text:span>.</text:p>
          </table:table-cell>
        </table:table-row>
        <table:table-row>
          <table:table-cell table:style-name="Table2.A2" office:value-type="string">
            <text:p text:style-name="P8">Heb 1:3</text:p>
          </table:table-cell>
          <table:table-cell table:style-name="Table2.B2" office:value-type="string">
            <text:p text:style-name="P9">Who being the brightness of his glory, and the express image of his person, and upholding all things by the word of his power<text:span text:style-name="T9">, when he hadG4160 G2512</text:span> by himself <text:span text:style-name="T9">purgedG4160 G2512</text:span> our sins, sat down on the right hand of the Majesty on high;</text:p>
          </table:table-cell>
        </table:table-row>
        <table:table-row>
          <table:table-cell table:style-name="Table2.A2" office:value-type="string">
            <text:p text:style-name="P8">2Pe 1:9</text:p>
          </table:table-cell>
          <table:table-cell table:style-name="Table2.B2" office:value-type="string">
            <text:p text:style-name="P9">But he that lacketh these things is blind, and cannot see afar off, and hath forgotten <text:span text:style-name="T9">that he was purged fromG2512</text:span> his old sin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1:53:52.957173700</meta:creation-date>
    <dc:title>default</dc:title>
    <meta:editing-duration>PT23M32S</meta:editing-duration>
    <meta:editing-cycles>13</meta:editing-cycles>
    <meta:generator>LibreOffice/26.2.4.2$Linux_X86_64 LibreOffice_project/64a984c51f4702dbd3710b13428c673a2f1292e7</meta:generator>
    <meta:initial-creator>William K. McDannell Jr.</meta:initial-creator>
    <dc:date>2026-07-11T12:30:01.168437035</dc:date>
    <meta:document-statistic meta:table-count="2" meta:image-count="0" meta:object-count="0" meta:page-count="1" meta:paragraph-count="25" meta:word-count="381" meta:character-count="2071" meta:non-whitespace-character-count="1719"/>
    <meta:template xlink:type="simple" xlink:actuate="onRequest" xlink:title="default" xlink:href="../../../../AppData/Roaming/LibreOffice/4/user/template/default.ott" meta:date="2025-09-15T11:53:52.500770500"/>
  </office:meta>
</office:document-meta>
</file>