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C0000039E3EE655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11.3236in" fo:break-before="page" table:align="center" style:may-break-between-rows="true" table:border-model="collapsing"/>
    </style:style>
    <style:style style:name="Table13.A" style:family="table-column">
      <style:table-column-properties style:column-width="3.309in"/>
    </style:style>
    <style:style style:name="Table13.B" style:family="table-column">
      <style:table-column-properties style:column-width="2.3771in"/>
    </style:style>
    <style:style style:name="Table13.C" style:family="table-column">
      <style:table-column-properties style:column-width="4.1257in"/>
    </style:style>
    <style:style style:name="Table13.D" style:family="table-column">
      <style:table-column-properties style:column-width="1.5118in"/>
    </style:style>
    <style:style style:name="Table13.1" style:family="table-row">
      <style:table-row-properties style:min-row-height="0.2472in" fo:keep-together="auto"/>
    </style:style>
    <style:style style:name="Table13.A1" style:family="table-cell">
      <style:table-cell-properties style:vertical-align="middle" fo:background-color="transparent" fo:padding="0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3.D1" style:family="table-cell">
      <style:table-cell-properties style:vertical-align="middle" fo:background-color="transparent" fo:padding="0in" fo:border="0.7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1.2931in" table:align="margins"/>
    </style:style>
    <style:style style:name="Table1.A" style:family="table-column">
      <style:table-column-properties style:column-width="11.2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424a3" officeooo:paragraph-rsid="003424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41c2a" officeooo:paragraph-rsid="00441c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690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2bb9" officeooo:paragraph-rsid="00482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c1ce" officeooo:paragraph-rsid="0048c1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7ea7" officeooo:paragraph-rsid="00497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1b87" officeooo:paragraph-rsid="004b1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f3f9" officeooo:paragraph-rsid="004cf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a4c2" officeooo:paragraph-rsid="004da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123b" officeooo:paragraph-rsid="004e1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d545" officeooo:paragraph-rsid="004ed54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db15" officeooo:paragraph-rsid="0050d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5e19" officeooo:paragraph-rsid="00515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d2d8" officeooo:paragraph-rsid="0053d2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9f36" officeooo:paragraph-rsid="00569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style:font-name="Liberation Sans"/>
    </style:style>
    <style:style style:name="P38" style:family="paragraph" style:parent-style-name="Table_20_Contents">
      <style:text-properties officeooo:paragraph-rsid="00773ab0"/>
    </style:style>
    <style:style style:name="P39" style:family="paragraph" style:parent-style-name="Standard">
      <style:text-properties style:font-name="Liberation Sans" officeooo:paragraph-rsid="00341bc2"/>
    </style:style>
    <style:style style:name="P40" style:family="paragraph" style:parent-style-name="Standard">
      <style:text-properties style:font-name="Liberation Sans" officeooo:rsid="00782e8f" officeooo:paragraph-rsid="00782e8f"/>
    </style:style>
    <style:style style:name="P41" style:family="paragraph" style:parent-style-name="Standard">
      <style:paragraph-properties fo:break-before="page"/>
      <style:text-properties style:font-name="Liberation Sans" officeooo:paragraph-rsid="00341bc2"/>
    </style:style>
    <style:style style:name="T1" style:family="text">
      <style:text-properties officeooo:rsid="00441c2a"/>
    </style:style>
    <style:style style:name="T2" style:family="text">
      <style:text-properties officeooo:rsid="0065b5e0"/>
    </style:style>
    <style:style style:name="T3" style:family="text">
      <style:text-properties officeooo:rsid="00657c5c"/>
    </style:style>
    <style:style style:name="T4" style:family="text">
      <style:text-properties officeooo:rsid="0060382b"/>
    </style:style>
    <style:style style:name="T5" style:family="text">
      <style:text-properties officeooo:rsid="00690122"/>
    </style:style>
    <style:style style:name="T6" style:family="text">
      <style:text-properties officeooo:rsid="006a0bc2"/>
    </style:style>
    <style:style style:name="T7" style:family="text">
      <style:text-properties officeooo:rsid="00627c78"/>
    </style:style>
    <style:style style:name="T8" style:family="text">
      <style:text-properties officeooo:rsid="0063d2d2"/>
    </style:style>
    <style:style style:name="T9" style:family="text">
      <style:text-properties officeooo:rsid="006e7974"/>
    </style:style>
    <style:style style:name="T10" style:family="text">
      <style:text-properties officeooo:rsid="006f310e"/>
    </style:style>
    <style:style style:name="T11" style:family="text">
      <style:text-properties officeooo:rsid="006fafd4"/>
    </style:style>
    <style:style style:name="T12" style:family="text">
      <style:text-properties officeooo:rsid="007064a4"/>
    </style:style>
    <style:style style:name="T13" style:family="text">
      <style:text-properties officeooo:rsid="0071b46f"/>
    </style:style>
    <style:style style:name="T14" style:family="text">
      <style:text-properties officeooo:rsid="0073043b"/>
    </style:style>
    <style:style style:name="T15" style:family="text">
      <style:text-properties officeooo:rsid="007412e9"/>
    </style:style>
    <style:style style:name="T16" style:family="text">
      <style:text-properties officeooo:rsid="00756223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474304"/>
    </style:style>
    <style:style style:name="T19" style:family="text">
      <style:text-properties officeooo:rsid="0058f0fd"/>
    </style:style>
    <style:style style:name="T20" style:family="text">
      <style:text-properties style:text-position="super 58%"/>
    </style:style>
    <style:style style:name="T21" style:family="text">
      <style:text-properties fo:color="#127622" loext:opacity="100%"/>
    </style:style>
    <style:style style:name="T22" style:family="text">
      <style:text-properties style:text-position="33% 80%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7a279e"/>
    </style:style>
    <style:style style:name="T25" style:family="text">
      <style:text-properties fo:color="#127622" loext:opacity="100%" officeooo:rsid="007a279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">1Sam - 2<text:span text:style-name="T1">Kin</text:span></text:p>
          </table:table-cell>
          <table:table-cell table:style-name="Table13.A1" office:value-type="string">
            <text:p text:style-name="P2">1Chr</text:p>
          </table:table-cell>
          <table:table-cell table:style-name="Table13.A1" office:value-type="string">
            <text:p text:style-name="P3">Matthew 1</text:p>
          </table:table-cell>
          <table:table-cell table:style-name="Table13.D1" office:value-type="string">
            <text:p text:style-name="P3">Luke 3</text:p>
          </table:table-cell>
        </table:table-row>
        <table:table-row table:style-name="Table13.2">
          <table:table-cell table:style-name="Table13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xml:id="list4288356046" text:style-name="L1">
              <text:list-item>
                <text:p text:style-name="P5">David</text:p>
              </text:list-item>
              <text:list-item>
                <text:p text:style-name="P6">Solomon/Jedidiah</text:p>
              </text:list-item>
              <text:list-item>
                <text:p text:style-name="P6">Rehoboam/Roboam</text:p>
              </text:list-item>
              <text:list-item>
                <text:p text:style-name="P6">Abijam/Abijah/Abia <text:span text:style-name="T2">(1Ki 14:31, 2Ch 12:16, 1Ch 3:10, Mat 1:17)</text:span></text:p>
              </text:list-item>
              <text:list-item>
                <text:p text:style-name="P6">Asa <text:span text:style-name="T3">(1Ki 15:8)</text:span></text:p>
              </text:list-item>
              <text:list-item>
                <text:p text:style-name="P7"><text:span text:style-name="T4">Jehoshaphat/Josaphat </text:span><text:span text:style-name="T5">(</text:span><text:span text:style-name="T6">1Ki 15:24, Mat 1:8)</text:span></text:p>
              </text:list-item>
              <text:list-item>
                <text:p text:style-name="P6">Jehoram/Joram <text:span text:style-name="T7">(1Ki 22:50)</text:span></text:p>
              </text:list-item>
            </text:list>
            <text:list text:style-name="L2">
              <text:list-item>
                <text:p text:style-name="P8">Ahaziah/Jehoahaz/Azariah <text:span text:style-name="T8">(2Ki 8:2)</text:span></text:p>
              </text:list-item>
              <text:list-item>
                <text:p text:style-name="P8">Joash/Jehoash <text:span text:style-name="T9">(2Ki 13:1)</text:span></text:p>
              </text:list-item>
              <text:list-item>
                <text:p text:style-name="P8">Amaziah <text:span text:style-name="T10">(2Ki 12:20,21)</text:span></text:p>
              </text:list-item>
            </text:list>
            <text:list xml:id="list122949731492170" text:continue-list="list4288356046" text:style-name="L1">
              <text:list-item>
                <text:p text:style-name="P6">Azariah/Uzziah/Ozias <text:span text:style-name="T11">(2Ki 14:21)</text:span></text:p>
              </text:list-item>
              <text:list-item>
                <text:p text:style-name="P6">Jotham/Joatham <text:span text:style-name="T12">(2Ki 15:7)</text:span></text:p>
              </text:list-item>
              <text:list-item>
                <text:p text:style-name="P6">Ahaz/Achaz <text:span text:style-name="T13">(2Ki 15:38)</text:span></text:p>
              </text:list-item>
              <text:list-item>
                <text:p text:style-name="P6">Hezekiah/Ezekias <text:span text:style-name="T14">(2Ki 16:20)</text:span></text:p>
              </text:list-item>
              <text:list-item>
                <text:p text:style-name="P6">Manasseh/Manasses <text:span text:style-name="T15">(2Ki 20:21)</text:span></text:p>
              </text:list-item>
              <text:list-item>
                <text:p text:style-name="P6">Amon <text:span text:style-name="T16">(2Ki 21:18)</text:span></text:p>
              </text:list-item>
            </text:list>
            <text:list text:style-name="L3">
              <text:list-item>
                <text:p text:style-name="P9">Josiah/Josias</text:p>
              </text:list-item>
              <text:list-item>
                <text:p text:style-name="P10">Eliakim/Jehoiakim</text:p>
              </text:list-item>
            </text:list>
            <text:list text:continue-list="list122949731492170" text:style-name="L1">
              <text:list-item>
                <text:p text:style-name="P11">Jehoiachin/Jeconiah/Coniah/Jechonias</text:p>
              </text:list-item>
            </text:list>
          </table:table-cell>
          <table:table-cell table:style-name="Table13.B2" office:value-type="string">
            <text:list text:continue-numbering="true" text:style-name="L1">
              <text:list-item text:start-value="1">
                <text:p text:style-name="P12">Abraham<text:span text:style-name="T17"> (1:27,28)</text:span></text:p>
              </text:list-item>
              <text:list-item>
                <text:p text:style-name="P13">Isaac (1:18,<text:span text:style-name="T18">34</text:span>)</text:p>
              </text:list-item>
              <text:list-item>
                <text:p text:style-name="P14">Israel/Jacob (1:34)</text:p>
              </text:list-item>
              <text:list-item>
                <text:p text:style-name="P15">Judah (2:1,<text:span text:style-name="T19">4:1</text:span>)</text:p>
              </text:list-item>
              <text:list-item>
                <text:p text:style-name="P16">Pharez (2:4,<text:span text:style-name="T19">4:1</text:span>)</text:p>
              </text:list-item>
              <text:list-item>
                <text:p text:style-name="P16">Hezron (2:5)</text:p>
              </text:list-item>
              <text:list-item>
                <text:p text:style-name="P17">Ram (2:9)</text:p>
              </text:list-item>
              <text:list-item>
                <text:p text:style-name="P18">Amminadab (2:10)</text:p>
              </text:list-item>
              <text:list-item>
                <text:p text:style-name="P19">Nahshon (2:10)</text:p>
              </text:list-item>
              <text:list-item>
                <text:p text:style-name="P20">Salma (2:11)</text:p>
              </text:list-item>
              <text:list-item>
                <text:p text:style-name="P20">Boaz (2:12)</text:p>
              </text:list-item>
              <text:list-item>
                <text:p text:style-name="P20">Obed (2:12)</text:p>
              </text:list-item>
              <text:list-item>
                <text:p text:style-name="P20">Jesse (2:12)</text:p>
              </text:list-item>
              <text:list-item>
                <text:p text:style-name="P21">David (7<text:span text:style-name="T20">th</text:span>)<text:span text:style-name="T17"> (2:15)</text:span></text:p>
              </text:list-item>
              <text:list-item>
                <text:p text:style-name="P22">Nathan &amp; Solomon (3:5)</text:p>
              </text:list-item>
              <text:list-item>
                <text:p text:style-name="P23">Rehoboam (3:10)</text:p>
              </text:list-item>
              <text:list-item>
                <text:p text:style-name="P23">Abia (3:10)</text:p>
              </text:list-item>
              <text:list-item>
                <text:p text:style-name="P23">Asa (3:10)</text:p>
              </text:list-item>
              <text:list-item>
                <text:p text:style-name="P23">Jehoshaphat (3:10)</text:p>
              </text:list-item>
              <text:list-item>
                <text:p text:style-name="P24">Joram (3:11)</text:p>
              </text:list-item>
              <text:list-item>
                <text:p text:style-name="P24">Ahaziah (3:11)</text:p>
              </text:list-item>
              <text:list-item>
                <text:p text:style-name="P24">Joash (3:11)</text:p>
              </text:list-item>
              <text:list-item>
                <text:p text:style-name="P25">Amaziah (3:12)</text:p>
              </text:list-item>
              <text:list-item>
                <text:p text:style-name="P25">Azariah (3:12)</text:p>
              </text:list-item>
              <text:list-item>
                <text:p text:style-name="P25">Jotham (3:12)</text:p>
              </text:list-item>
              <text:list-item>
                <text:p text:style-name="P26">Ahaz (3:13)</text:p>
              </text:list-item>
              <text:list-item>
                <text:p text:style-name="P26">Hezekiah (3:13)</text:p>
              </text:list-item>
              <text:list-item>
                <text:p text:style-name="P26">Manasseh (3:13)</text:p>
              </text:list-item>
              <text:list-item>
                <text:p text:style-name="P27">Amon (3:14)</text:p>
              </text:list-item>
              <text:list-item>
                <text:p text:style-name="P28">Josiah (3:14)</text:p>
              </text:list-item>
              <text:list-item>
                <text:p text:style-name="P29">Jehoiakim (3:15)</text:p>
              </text:list-item>
              <text:list-item>
                <text:p text:style-name="P29">Jeconiah (3:16)</text:p>
              </text:list-item>
              <text:list-item>
                <text:p text:style-name="P30">Salathiel (3:17)</text:p>
              </text:list-item>
            </text:list>
          </table:table-cell>
          <table:table-cell table:style-name="Table13.C2" office:value-type="string">
            <text:list xml:id="list2107094810" text:style-name="L4">
              <text:list-item>
                <text:p text:style-name="P31">Abraham</text:p>
              </text:list-item>
              <text:list-item>
                <text:p text:style-name="P32">Isaac</text:p>
              </text:list-item>
              <text:list-item>
                <text:p text:style-name="P32">Jacob</text:p>
              </text:list-item>
              <text:list-item>
                <text:p text:style-name="P32">Judas (Judah) Gen 46:12</text:p>
              </text:list-item>
              <text:list-item>
                <text:p text:style-name="P32">Phares (Pharez) Gen 46:12</text:p>
              </text:list-item>
              <text:list-item>
                <text:p text:style-name="P32">Hezron/Esrom</text:p>
              </text:list-item>
              <text:list-item>
                <text:p text:style-name="P32">Ram/Aram</text:p>
              </text:list-item>
              <text:list-item>
                <text:p text:style-name="P32">Amminadab/Aminadab</text:p>
              </text:list-item>
              <text:list-item>
                <text:p text:style-name="P32">Nahshon/Naasson</text:p>
              </text:list-item>
              <text:list-item>
                <text:p text:style-name="P32">Salmon</text:p>
              </text:list-item>
              <text:list-item>
                <text:p text:style-name="P32">Boaz/Booz</text:p>
              </text:list-item>
              <text:list-item>
                <text:p text:style-name="P32">Obed</text:p>
              </text:list-item>
              <text:list-item>
                <text:p text:style-name="P32">Jesse</text:p>
              </text:list-item>
              <text:list-item>
                <text:p text:style-name="P31">David<text:span text:style-name="T17"> 1Ch 3</text:span></text:p>
              </text:list-item>
              <text:list-item>
                <text:p text:style-name="P32">Solomon</text:p>
              </text:list-item>
              <text:list-item>
                <text:p text:style-name="P32">Rehoboam</text:p>
              </text:list-item>
              <text:list-item>
                <text:p text:style-name="P32">Abia</text:p>
              </text:list-item>
              <text:list-item>
                <text:p text:style-name="P32">Asa</text:p>
              </text:list-item>
              <text:list-item>
                <text:p text:style-name="P32">Josaphat (Jehoshaphat 1Ki 15:24)</text:p>
              </text:list-item>
              <text:list-item>
                <text:p text:style-name="P32">Joram (Jehoram 2Ki 8:16)</text:p>
              </text:list-item>
            </text:list>
            <text:list text:style-name="L5">
              <text:list-item>
                <text:p text:style-name="P33">Ahaziah (Azariah/Jehoahaz)</text:p>
              </text:list-item>
              <text:list-item>
                <text:p text:style-name="P33">Joash (Jehoash)</text:p>
              </text:list-item>
              <text:list-item>
                <text:p text:style-name="P33">Amaziah</text:p>
              </text:list-item>
            </text:list>
            <text:list xml:id="list122949452692881" text:continue-list="list2107094810" text:style-name="L4">
              <text:list-item>
                <text:p text:style-name="P32">Ozias (Azariah/Uzziah)</text:p>
              </text:list-item>
              <text:list-item>
                <text:p text:style-name="P32">Joatham (Jotham)</text:p>
              </text:list-item>
              <text:list-item>
                <text:p text:style-name="P32">Achaz</text:p>
              </text:list-item>
              <text:list-item>
                <text:p text:style-name="P32">Ezekias (Hezekiah)</text:p>
              </text:list-item>
              <text:list-item>
                <text:p text:style-name="P32">Manasses (Manasseh)</text:p>
              </text:list-item>
              <text:list-item>
                <text:p text:style-name="P32">Amon</text:p>
              </text:list-item>
              <text:list-item>
                <text:p text:style-name="P34">Josias (Josiah) Mat 1:11</text:p>
              </text:list-item>
            </text:list>
            <text:list text:style-name="L6">
              <text:list-item>
                <text:p text:style-name="P35">Eliakim / Jehoiakim (2Ki 23:34, 24:8)</text:p>
              </text:list-item>
            </text:list>
            <text:list text:continue-list="list122949452692881" text:style-name="L4">
              <text:list-item>
                <text:p text:style-name="P36">Jechonias (Jehoichin/Jeconiah/Coniah) H3204</text:p>
              </text:list-item>
              <text:list-item>
                <text:p text:style-name="P32">Salathiel (Shealtiel)</text:p>
              </text:list-item>
              <text:list-item>
                <text:p text:style-name="P32">Zorobabel (Zerubbabel) Ezr 3:2</text:p>
              </text:list-item>
              <text:list-item>
                <text:p text:style-name="P32">Abiud</text:p>
              </text:list-item>
              <text:list-item>
                <text:p text:style-name="P32">Eliakim</text:p>
              </text:list-item>
              <text:list-item>
                <text:p text:style-name="P32">Azor</text:p>
              </text:list-item>
              <text:list-item>
                <text:p text:style-name="P32">Sadoc</text:p>
              </text:list-item>
              <text:list-item>
                <text:p text:style-name="P32">Achim</text:p>
              </text:list-item>
              <text:list-item>
                <text:p text:style-name="P32">Eliud</text:p>
              </text:list-item>
              <text:list-item>
                <text:p text:style-name="P32">Eleazar</text:p>
              </text:list-item>
              <text:list-item>
                <text:p text:style-name="P32">Matthan</text:p>
              </text:list-item>
              <text:list-item>
                <text:p text:style-name="P32">Jacob</text:p>
              </text:list-item>
              <text:list-item>
                <text:p text:style-name="P32">Joseph</text:p>
              </text:list-item>
              <text:list-item>
                <text:p text:style-name="P31">Jesus</text:p>
              </text:list-item>
            </text:list>
            <text:p text:style-name="P4"/>
          </table:table-cell>
          <table:table-cell table:style-name="Table13.D2" office:value-type="string">
            <text:list text:continue-numbering="true" text:style-name="L4">
              <text:list-item text:start-value="1">
                <text:p text:style-name="P31">Abraham</text:p>
              </text:list-item>
              <text:list-item>
                <text:p text:style-name="P32">Isaac</text:p>
              </text:list-item>
              <text:list-item>
                <text:p text:style-name="P32">Jacob</text:p>
              </text:list-item>
              <text:list-item>
                <text:p text:style-name="P32">Juda/Judah</text:p>
              </text:list-item>
              <text:list-item>
                <text:p text:style-name="P32">Phares</text:p>
              </text:list-item>
              <text:list-item>
                <text:p text:style-name="P32">Esrom</text:p>
              </text:list-item>
              <text:list-item>
                <text:p text:style-name="P32">Aram</text:p>
              </text:list-item>
              <text:list-item>
                <text:p text:style-name="P32">Aminadab</text:p>
              </text:list-item>
              <text:list-item>
                <text:p text:style-name="P32">Naasson</text:p>
              </text:list-item>
              <text:list-item>
                <text:p text:style-name="P32">Salmon</text:p>
              </text:list-item>
              <text:list-item>
                <text:p text:style-name="P32">Booz</text:p>
              </text:list-item>
              <text:list-item>
                <text:p text:style-name="P32">Obed</text:p>
              </text:list-item>
              <text:list-item>
                <text:p text:style-name="P32">Jesse</text:p>
              </text:list-item>
              <text:list-item>
                <text:p text:style-name="P31">David</text:p>
              </text:list-item>
              <text:list-item>
                <text:p text:style-name="P32">Nathan</text:p>
              </text:list-item>
              <text:list-item>
                <text:p text:style-name="P32">Mattatha</text:p>
              </text:list-item>
              <text:list-item>
                <text:p text:style-name="P32">Menan</text:p>
              </text:list-item>
              <text:list-item>
                <text:p text:style-name="P32">Melea</text:p>
              </text:list-item>
              <text:list-item>
                <text:p text:style-name="P32">Eliakim</text:p>
              </text:list-item>
              <text:list-item>
                <text:p text:style-name="P32">Jonan</text:p>
              </text:list-item>
              <text:list-item>
                <text:p text:style-name="P32">Joseph</text:p>
              </text:list-item>
              <text:list-item>
                <text:p text:style-name="P32">Juda</text:p>
              </text:list-item>
              <text:list-item>
                <text:p text:style-name="P32">Simeon</text:p>
              </text:list-item>
              <text:list-item>
                <text:p text:style-name="P32">Levi</text:p>
              </text:list-item>
              <text:list-item>
                <text:p text:style-name="P32">Matthat</text:p>
              </text:list-item>
              <text:list-item>
                <text:p text:style-name="P32">Jorim</text:p>
              </text:list-item>
              <text:list-item>
                <text:p text:style-name="P36">Eliezer</text:p>
              </text:list-item>
              <text:list-item>
                <text:p text:style-name="P36">Jose</text:p>
              </text:list-item>
              <text:list-item>
                <text:p text:style-name="P36">Er</text:p>
              </text:list-item>
              <text:list-item>
                <text:p text:style-name="P36">Elmodam</text:p>
              </text:list-item>
              <text:list-item>
                <text:p text:style-name="P36">Cosam</text:p>
              </text:list-item>
              <text:list-item>
                <text:p text:style-name="P36">Addi</text:p>
              </text:list-item>
              <text:list-item>
                <text:p text:style-name="P36">Melchi</text:p>
              </text:list-item>
              <text:list-item>
                <text:p text:style-name="P36">Neri</text:p>
              </text:list-item>
              <text:list-item>
                <text:p text:style-name="P36">Salathiel</text:p>
              </text:list-item>
              <text:list-item>
                <text:p text:style-name="P36">Zorobabel</text:p>
              </text:list-item>
              <text:list-item>
                <text:p text:style-name="P36">Rhesa</text:p>
              </text:list-item>
              <text:list-item>
                <text:p text:style-name="P36">Joanna</text:p>
              </text:list-item>
              <text:list-item>
                <text:p text:style-name="P36">Juda</text:p>
              </text:list-item>
              <text:list-item>
                <text:p text:style-name="P36">Joseph</text:p>
              </text:list-item>
              <text:list-item>
                <text:p text:style-name="P36">Semei</text:p>
              </text:list-item>
              <text:list-item>
                <text:p text:style-name="P32">Mattathias</text:p>
              </text:list-item>
              <text:list-item>
                <text:p text:style-name="P32">Maath</text:p>
              </text:list-item>
              <text:list-item>
                <text:p text:style-name="P32">Nagge</text:p>
              </text:list-item>
              <text:list-item>
                <text:p text:style-name="P32">Esli</text:p>
              </text:list-item>
              <text:list-item>
                <text:p text:style-name="P32">Naum</text:p>
              </text:list-item>
              <text:list-item>
                <text:p text:style-name="P32">Amos</text:p>
              </text:list-item>
              <text:list-item>
                <text:p text:style-name="P32">Mattathias</text:p>
              </text:list-item>
              <text:list-item>
                <text:p text:style-name="P32">Joseph</text:p>
              </text:list-item>
              <text:list-item>
                <text:p text:style-name="P32">Janna</text:p>
              </text:list-item>
              <text:list-item>
                <text:p text:style-name="P32">Melchi</text:p>
              </text:list-item>
              <text:list-item>
                <text:p text:style-name="P32">Heli</text:p>
              </text:list-item>
              <text:list-item>
                <text:p text:style-name="P32">Joseph</text:p>
              </text:list-item>
              <text:list-item>
                <text:p text:style-name="P31">Jesus</text:p>
              </text:list-item>
            </text:list>
          </table:table-cell>
        </table:table-row>
      </table:table>
      <text:p text:style-name="P37"/>
      <table:table table:name="Table1" table:style-name="Table1">
        <table:table-column table:style-name="Table1.A"/>
        <table:table-row>
          <table:table-cell table:style-name="Table1.A1" office:value-type="string">
            <text:p text:style-name="P38"><text:span text:style-name="T21">Matthew 1:11-12</text:span><text:line-break/><text:span text:style-name="T22">11</text:span> And Josias begat <text:span text:style-name="T23">Jechonias</text:span> and <text:span text:style-name="T23">his brethren</text:span>, about the time <text:span text:style-name="T23">they</text:span> were carried away to Babylon: <text:line-break/><text:span text:style-name="T22">12</text:span> And after <text:span text:style-name="T23">they</text:span> were brought to Babylon, <text:span text:style-name="T23">Jechonias</text:span> begat Salathiel; and Salathiel begat Zorobabel;</text:p>
          </table:table-cell>
        </table:table-row>
      </table:table>
      <text:p text:style-name="P39"/>
      <text:p text:style-name="P40">In <text:span text:style-name="T21">2Ki 22</text:span> (PP <text:span text:style-name="T21">2Ch 3</text:span>) king Josiah/Josias is told by the LORD that he will go to the grave before the Babylonian captivity. <text:span text:style-name="T24">Thus, in </text:span><text:span text:style-name="T25">Mat 1:11-12</text:span><text:span text:style-name="T24"> the “they” does not refer to Josiah/Josias.</text:span></text:p>
      <text:p text:style-name="P41"><draw:frame draw:style-name="fr1" draw:name="Image1" text:anchor-type="char" svg:y="3.0189in" svg:width="8.1in" svg:height="9.0583in" draw:z-index="0"><draw:image xlink:href="Pictures/100000010000033C0000039E3EE655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29:47.975417049</dc:date>
    <meta:editing-duration>PT7H6M31S</meta:editing-duration>
    <meta:editing-cycles>109</meta:editing-cycles>
    <meta:generator>LibreOffice/26.2.4.2$Linux_X86_64 LibreOffice_project/64a984c51f4702dbd3710b13428c673a2f1292e7</meta:generator>
    <meta:print-date>2024-12-22T15:58:10.677000000</meta:print-date>
    <meta:printed-by>PDF files</meta:printed-by>
    <meta:document-statistic meta:table-count="2" meta:image-count="1" meta:object-count="0" meta:page-count="2" meta:paragraph-count="157" meta:word-count="483" meta:character-count="2654" meta:non-whitespace-character-count="2478"/>
  </office:meta>
</office:document-meta>
</file>