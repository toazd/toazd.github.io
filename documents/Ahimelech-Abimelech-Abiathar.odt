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7" style:family="table">
      <style:table-properties style:width="8.2in" table:align="margins"/>
    </style:style>
    <style:style style:name="Table7.A" style:family="table-column">
      <style:table-column-properties style:column-width="8.2in" style:rel-column-width="65535*"/>
    </style:style>
    <style:style style:name="Table7.A1" style:family="table-cell">
      <style:table-cell-properties fo:padding="0.0382in" fo:border="0.5pt solid #000000"/>
    </style:style>
    <style:style style:name="Table5" style:family="table">
      <style:table-properties style:width="8.2in" table:align="margins"/>
    </style:style>
    <style:style style:name="Table5.A" style:family="table-column">
      <style:table-column-properties style:column-width="8.2in" style:rel-column-width="65535*"/>
    </style:style>
    <style:style style:name="Table5.A1" style:family="table-cell">
      <style:table-cell-properties fo:padding="0.0382in" fo:border="0.5pt solid #000000"/>
    </style:style>
    <style:style style:name="Table2" style:family="table">
      <style:table-properties style:width="8.2in" table:align="margins"/>
    </style:style>
    <style:style style:name="Table2.A" style:family="table-column">
      <style:table-column-properties style:column-width="8.2in" style:rel-column-width="65535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8.2in" table:align="margins"/>
    </style:style>
    <style:style style:name="Table6.A" style:family="table-column">
      <style:table-column-properties style:column-width="8.2in" style:rel-column-width="65535*"/>
    </style:style>
    <style:style style:name="Table6.A1" style:family="table-cell">
      <style:table-cell-properties fo:padding="0.0382in" fo:border="0.5pt solid #000000"/>
    </style:style>
    <style:style style:name="Table1" style:family="table">
      <style:table-properties style:width="8.2in" table:align="margins"/>
    </style:style>
    <style:style style:name="Table1.A" style:family="table-column">
      <style:table-column-properties style:column-width="8.2in" style:rel-column-width="65535*"/>
    </style:style>
    <style:style style:name="Table1.A1" style:family="table-cell">
      <style:table-cell-properties fo:padding="0.0382in" fo:border="0.5pt solid #000000"/>
    </style:style>
    <style:style style:name="Table4" style:family="table">
      <style:table-properties style:width="8.2in" table:align="margins"/>
    </style:style>
    <style:style style:name="Table4.A" style:family="table-column">
      <style:table-column-properties style:column-width="8.2in" style:rel-column-width="65535*"/>
    </style:style>
    <style:style style:name="Table4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43bd9a"/>
    </style:style>
    <style:style style:name="P2" style:family="paragraph" style:parent-style-name="Table_20_Contents">
      <style:text-properties fo:color="#127622" loext:opacity="100%" officeooo:paragraph-rsid="0038abfc"/>
    </style:style>
    <style:style style:name="P3" style:family="paragraph" style:parent-style-name="Table_20_Contents">
      <style:text-properties officeooo:paragraph-rsid="0038abfc"/>
    </style:style>
    <style:style style:name="P4" style:family="paragraph" style:parent-style-name="Table_20_Contents">
      <style:text-properties officeooo:paragraph-rsid="005702e9"/>
    </style:style>
    <style:style style:name="P5" style:family="paragraph" style:parent-style-name="Standard">
      <style:text-properties officeooo:rsid="001e443b" officeooo:paragraph-rsid="003aae83"/>
    </style:style>
    <style:style style:name="P6" style:family="paragraph" style:parent-style-name="Standard" style:list-style-name="L1">
      <style:text-properties officeooo:rsid="006217dc" officeooo:paragraph-rsid="006217dc"/>
    </style:style>
    <style:style style:name="P7" style:family="paragraph" style:parent-style-name="Standard">
      <style:paragraph-properties fo:text-align="center" style:justify-single-word="false"/>
      <style:text-properties officeooo:rsid="0066832a" officeooo:paragraph-rsid="0066832a"/>
    </style:style>
    <style:style style:name="P8" style:family="paragraph" style:parent-style-name="Table_20_Contents">
      <style:text-properties fo:color="#127622" loext:opacity="100%" officeooo:rsid="001e443b" officeooo:paragraph-rsid="003aae83"/>
    </style:style>
    <style:style style:name="P9" style:family="paragraph" style:parent-style-name="Table_20_Contents">
      <style:text-properties officeooo:rsid="001e443b" officeooo:paragraph-rsid="003aae83"/>
    </style:style>
    <style:style style:name="P10" style:family="paragraph" style:parent-style-name="Table_20_Contents">
      <style:text-properties officeooo:rsid="002806e0" officeooo:paragraph-rsid="003aae83"/>
    </style:style>
    <style:style style:name="P11" style:family="paragraph" style:parent-style-name="Table_20_Contents">
      <style:text-properties officeooo:rsid="002b35a6" officeooo:paragraph-rsid="003aae83"/>
    </style:style>
    <style:style style:name="P12" style:family="paragraph" style:parent-style-name="Standard">
      <style:text-properties officeooo:paragraph-rsid="003aae83"/>
    </style:style>
    <style:style style:name="P13" style:family="paragraph" style:parent-style-name="Standard">
      <style:paragraph-properties fo:text-align="center" style:justify-single-word="false"/>
      <style:text-properties officeooo:rsid="00674eca" officeooo:paragraph-rsid="00674eca"/>
    </style:style>
    <style:style style:name="P14" style:family="paragraph" style:parent-style-name="Table_20_Contents">
      <style:text-properties fo:color="#127622" loext:opacity="100%" officeooo:rsid="001cbcb0" officeooo:paragraph-rsid="00211d2a"/>
    </style:style>
    <style:style style:name="P15" style:family="paragraph" style:parent-style-name="Table_20_Contents">
      <style:text-properties officeooo:rsid="001cbcb0" officeooo:paragraph-rsid="00211d2a"/>
    </style:style>
    <style:style style:name="P16" style:family="paragraph" style:parent-style-name="Table_20_Contents">
      <style:text-properties fo:color="#127622" loext:opacity="100%" officeooo:rsid="001cbcb0" officeooo:paragraph-rsid="0039d196"/>
    </style:style>
    <style:style style:name="P17" style:family="paragraph" style:parent-style-name="Table_20_Contents">
      <style:text-properties officeooo:rsid="001cbcb0" officeooo:paragraph-rsid="0039d196"/>
    </style:style>
    <style:style style:name="P18" style:family="paragraph" style:parent-style-name="Table_20_Contents">
      <style:text-properties fo:color="#127622" loext:opacity="100%" officeooo:rsid="001fd983" officeooo:paragraph-rsid="002b3f23"/>
    </style:style>
    <style:style style:name="P19" style:family="paragraph" style:parent-style-name="Table_20_Contents">
      <style:text-properties officeooo:rsid="001fd983" officeooo:paragraph-rsid="002b3f23"/>
    </style:style>
    <style:style style:name="P20" style:family="paragraph" style:parent-style-name="Standard">
      <style:paragraph-properties fo:text-align="center" style:justify-single-word="false"/>
      <style:text-properties officeooo:rsid="006564a2" officeooo:paragraph-rsid="006564a2"/>
    </style:style>
    <style:style style:name="P21" style:family="paragraph" style:parent-style-name="Table_20_Contents">
      <style:text-properties fo:color="#127622" loext:opacity="100%" officeooo:paragraph-rsid="00650c2f"/>
    </style:style>
    <style:style style:name="P22" style:family="paragraph" style:parent-style-name="Table_20_Contents">
      <style:text-properties fo:color="#ff0000" loext:opacity="100%" officeooo:paragraph-rsid="00650c2f"/>
    </style:style>
    <style:style style:name="P23" style:family="paragraph" style:parent-style-name="Standard">
      <style:paragraph-properties fo:text-align="center" style:justify-single-word="false"/>
      <style:text-properties officeooo:rsid="005ce3d5" officeooo:paragraph-rsid="005ce3d5"/>
    </style:style>
    <style:style style:name="P24" style:family="paragraph" style:parent-style-name="Table_20_Contents">
      <style:text-properties fo:color="#127622" loext:opacity="100%" officeooo:paragraph-rsid="005ce3d5"/>
    </style:style>
    <style:style style:name="P25" style:family="paragraph" style:parent-style-name="Table_20_Contents">
      <style:text-properties officeooo:paragraph-rsid="005ce3d5"/>
    </style:style>
    <style:style style:name="P26" style:family="paragraph" style:parent-style-name="Standard">
      <style:text-properties officeooo:paragraph-rsid="005ce3d5"/>
    </style:style>
    <style:style style:name="T1" style:family="text">
      <style:text-properties officeooo:rsid="0043bd9a"/>
    </style:style>
    <style:style style:name="T2" style:family="text">
      <style:text-properties officeooo:rsid="005702e9"/>
    </style:style>
    <style:style style:name="T3" style:family="text">
      <style:text-properties fo:color="#127622" loext:opacity="100%" style:text-position="super 58%" officeooo:rsid="005702e9"/>
    </style:style>
    <style:style style:name="T4" style:family="text">
      <style:text-properties fo:color="#127622" loext:opacity="100%" officeooo:rsid="005702e9"/>
    </style:style>
    <style:style style:name="T5" style:family="text">
      <style:text-properties fo:background-color="#fff5ce" loext:char-shading-value="0"/>
    </style:style>
    <style:style style:name="T6" style:family="text">
      <style:text-properties style:text-position="super 58%" officeooo:rsid="002474e0"/>
    </style:style>
    <style:style style:name="T7" style:family="text">
      <style:text-properties fo:color="#127622" loext:opacity="100%" style:text-position="super 58%" officeooo:rsid="002474e0"/>
    </style:style>
    <style:style style:name="T8" style:family="text">
      <style:text-properties style:use-window-font-color="true" loext:opacity="0%" style:text-position="super 58%" officeooo:rsid="002474e0"/>
    </style:style>
    <style:style style:name="T9" style:family="text">
      <style:text-properties style:text-position="super 58%" officeooo:rsid="002f93c3"/>
    </style:style>
    <style:style style:name="T10" style:family="text">
      <style:text-properties fo:color="#127622" loext:opacity="100%" style:text-position="super 58%" officeooo:rsid="002f93c3"/>
    </style:style>
    <style:style style:name="T11" style:family="text">
      <style:text-properties fo:color="#127622" loext:opacity="100%" style:text-position="super 58%"/>
    </style:style>
    <style:style style:name="T12" style:family="text">
      <style:text-properties officeooo:rsid="00266570"/>
    </style:style>
    <style:style style:name="T13" style:family="text">
      <style:text-properties officeooo:rsid="002806e0"/>
    </style:style>
    <style:style style:name="T14" style:family="text">
      <style:text-properties officeooo:rsid="00403063"/>
    </style:style>
    <style:style style:name="T15" style:family="text">
      <style:text-properties fo:color="#127622" loext:opacity="100%" style:text-position="super 58%" officeooo:rsid="00266570"/>
    </style:style>
    <style:style style:name="T16" style:family="text">
      <style:text-properties style:text-position="super 58%"/>
    </style:style>
    <style:style style:name="T17" style:family="text">
      <style:text-properties fo:background-color="#dedce6" loext:char-shading-value="0"/>
    </style:style>
    <style:style style:name="T18" style:family="text">
      <style:text-properties fo:background-color="#ffff00" loext:char-shading-value="0"/>
    </style:style>
    <style:style style:name="T19" style:family="text">
      <style:text-properties fo:background-color="#ffdbb6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ime of Saul/Jonathon &amp; armourbearer went up to the Philistine garrison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">1 Samuel 14:3,<text:span text:style-name="T2">18</text:span></text:p>
            <text:p text:style-name="P3"><text:span text:style-name="T3">3</text:span><text:span text:style-name="T4"> </text:span>And <text:span text:style-name="T5">Ahiah</text:span><text:span text:style-name="T6">[?Ahimelech </text:span><text:span text:style-name="T7">1Sa 22:9,11,20</text:span><text:span text:style-name="T8">?</text:span><text:span text:style-name="T6">]</text:span>, the son of Ahitub, I-chabod's<text:span text:style-name="T9">[</text:span><text:span text:style-name="T10">1Sa 4:21</text:span><text:span text:style-name="T9">]</text:span> brother, the son of Phinehas, the son of Eli, the LORD's <text:span text:style-name="T5">priest in Shiloh</text:span>, wearing an ephod. And the people knew not that Jonathan was gone.</text:p>
            <text:p text:style-name="P4"><text:span text:style-name="T11">18</text:span> And Saul said unto <text:span text:style-name="T5">Ahiah</text:span>, Bring hither the ark of God. For the ark of God was at that time with the children of Israel.</text:p>
          </table:table-cell>
        </table:table-row>
      </table:table>
      <text:p text:style-name="P5"/>
      <text:list text:style-name="L1">
        <text:list-item>
          <text:p text:style-name="P6">No way to prove (with scripture) that the priest at Shiloh (Ahiah) is the same man as the priest at Nob (Ahimelech).</text:p>
        </text:list-item>
      </text:list>
      <text:p text:style-name="P5"/>
      <text:p text:style-name="P7">Ahimelech is murdered and his son Abiathar joins David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8">1 Samuel <text:span text:style-name="T12">21:1, </text:span>22:<text:span text:style-name="T13">9,11,,</text:span><text:span text:style-name="T14">16,</text:span>20, 23:6</text:p>
            <text:p text:style-name="P9"><text:span text:style-name="T15">21:1</text:span><text:span text:style-name="T12"> </text:span>Then came David to Nob to <text:span text:style-name="T5">Ahimelech the priest</text:span>: and <text:span text:style-name="T5">Ahimelech</text:span> was afraid at the meeting of David, and said unto him, Why [art] thou alone, and no man with thee?</text:p>
            <text:p text:style-name="P9"><text:span text:style-name="T11">22:9</text:span> Then answered Doeg the Edomite, which was set over the servants of Saul, and said, I saw the son of Jesse coming to Nob, to <text:span text:style-name="T5">Ahimelech the son of Ahitub</text:span>.</text:p>
            <text:p text:style-name="P9"><text:span text:style-name="T11">22:11</text:span> Then the king sent to call <text:span text:style-name="T5">Ahimelech the priest, the son of Ahitub</text:span>, and all his father's house, the priests that were in Nob: and they came all of them to the king.</text:p>
            <text:p text:style-name="P9"><text:span text:style-name="T11">22:16</text:span><text:span text:style-name="T16"> </text:span>And the king said, Thou shalt surely die, <text:span text:style-name="T5">Ahimelech</text:span>, thou, and all thy father's house.</text:p>
            <text:p text:style-name="P10"><text:span text:style-name="T11">22:20</text:span> And one of the sons of <text:span text:style-name="T5">Ahimelech the son of Ahitub</text:span>, named <text:span text:style-name="T17">Abiathar</text:span>, escaped, and fled after David.</text:p>
            <text:p text:style-name="P11"><text:span text:style-name="T11">23:6</text:span> And it came to pass, when <text:span text:style-name="T18">Abiathar the son of Ahimelech</text:span> fled to David to Keilah, that he came down with an ephod in his hand.</text:p>
          </table:table-cell>
        </table:table-row>
      </table:table>
      <text:p text:style-name="P12"/>
      <text:p text:style-name="P13">Abiathar son of Ahimelech (that joined David) is also referred to as Ahimelech/Abimlech son of Abiathar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4">2 Samuel 8:17</text:p>
            <text:p text:style-name="P15">And Zadok the son of Ahitub, and <text:span text:style-name="T19">Ahimelech the son of Abiathar</text:span>, were the priests; and Seraiah was the scribe;</text:p>
          </table:table-cell>
        </table:table-row>
        <table:table-row>
          <table:table-cell table:style-name="Table2.A2" office:value-type="string">
            <text:p text:style-name="P16">1 Chronicles 18:16</text:p>
            <text:p text:style-name="P17">And Zadok the son of Ahitub, and <text:span text:style-name="T19">Abimelech the son of Abiathar</text:span>, were the priests; and Shavsha was scribe;</text:p>
          </table:table-cell>
        </table:table-row>
      </table:table>
      <text:p text:style-name="Standard"/>
      <table:table table:name="Table6" table:style-name="Table6">
        <table:table-column table:style-name="Table6.A"/>
        <table:table-row>
          <table:table-cell table:style-name="Table6.A1" office:value-type="string">
            <text:p text:style-name="P18">1 Kings 1:7</text:p>
            <text:p text:style-name="P19">And he conferred with Joab the son of Zeruiah, and with <text:span text:style-name="T18">Abiathar the priest</text:span>: and they following Adonijah helped him.</text:p>
          </table:table-cell>
        </table:table-row>
      </table:table>
      <text:p text:style-name="Standard"/>
      <text:p text:style-name="P20">Abiathar the son of Abimelech wasn’t made high priest until after his father was murdered and after David ascended to the throne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1">Mark 2:26</text:p>
            <text:p text:style-name="P22">How he went into the house of God in the days of <text:span text:style-name="T18">Abiathar the high priest</text:span>, and did eat the shewbread, which is not lawful to eat but for the priests, and gave also to them which were with him?</text:p>
          </table:table-cell>
        </table:table-row>
      </table:table>
      <text:p text:style-name="Standard"/>
      <text:p text:style-name="Standard"/>
      <text:p text:style-name="P23">Not unprecedented to have more than one high priest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4">Luke 3:2</text:p>
            <text:p text:style-name="P25">Annas and Caiaphas being <text:span text:style-name="T18">the high priests</text:span>, the word of God came unto John the son of Zacharias in the wilderness.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0T13:30:58.586000000</meta:creation-date>
    <meta:editing-duration>PT1H53M9S</meta:editing-duration>
    <meta:editing-cycles>71</meta:editing-cycles>
    <meta:generator>LibreOffice/24.8.6.2$Windows_X86_64 LibreOffice_project/6d98ba145e9a8a39fc57bcc76981d1fb1316c60c</meta:generator>
    <dc:title>BibleStudyTemplate</dc:title>
    <dc:date>2025-05-20T15:24:42.847000000</dc:date>
    <meta:document-statistic meta:table-count="6" meta:image-count="0" meta:object-count="0" meta:page-count="1" meta:paragraph-count="26" meta:word-count="453" meta:character-count="2431" meta:non-whitespace-character-count="2005"/>
    <meta:template xlink:type="simple" xlink:actuate="onRequest" xlink:title="BibleStudyTemplate" xlink:href="../../../../AppData/Roaming/LibreOffice/4/user/template/BibleStudyTemplate.ott" meta:date="2025-05-20T13:30:58.150000000"/>
  </office:meta>
</office:document-meta>
</file>