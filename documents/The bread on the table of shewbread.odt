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98e54" officeooo:paragraph-rsid="00298e54" style:font-size-asian="14pt" style:font-size-complex="14pt"/>
    </style:style>
    <style:style style:name="P2" style:family="paragraph" style:parent-style-name="Table_20_Contents">
      <style:text-properties fo:color="#127622" loext:opacity="100%"/>
    </style:style>
    <style:style style:name="P3" style:family="paragraph" style:parent-style-name="Standard">
      <style:text-properties officeooo:rsid="002441f6" officeooo:paragraph-rsid="002441f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</style:style>
    <style:style style:name="P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family-complex="'NotoSans NF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family-complex="'NotoSans NF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dbb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 style:parent-style-name="Standard" style:list-style-name="L1">
      <style:text-properties officeooo:rsid="001d703b" officeooo:paragraph-rsid="001d703b"/>
    </style:style>
    <style:style style:name="P13" style:family="paragraph" style:parent-style-name="Standard" style:list-style-name="L1">
      <style:text-properties officeooo:rsid="001dc9d2" officeooo:paragraph-rsid="001dc9d2"/>
    </style:style>
    <style:style style:name="P14" style:family="paragraph" style:parent-style-name="Standard" style:list-style-name="L1">
      <style:text-properties officeooo:rsid="001f176c" officeooo:paragraph-rsid="001f176c"/>
    </style:style>
    <style:style style:name="P15" style:family="paragraph" style:parent-style-name="Standard">
      <style:text-properties officeooo:rsid="001f176c" officeooo:paragraph-rsid="001f176c"/>
    </style:style>
    <style:style style:name="P16" style:family="paragraph" style:parent-style-name="Standard">
      <style:text-properties officeooo:rsid="00214f94" officeooo:paragraph-rsid="00214f94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position="super 58%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family-complex="'NotoSans NF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family-complex="'NotoSans NF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style:style style:name="T9" style:family="text">
      <style:text-properties officeooo:rsid="002221f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2.6535in" fo:min-width="5.3016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solid" svg:stroke-width="0in" svg:stroke-color="#ff8000" draw:marker-start="Arrow" draw:marker-start-width="0.1181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ffbf00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3882in" fo:min-width="0.28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solid" svg:stroke-width="0in" svg:stroke-color="#ffbf00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3882in" fo:min-width="0.29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ffbf00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3874in" fo:min-width="0.28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ffbf00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389in" fo:min-width="0.28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ffbf00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3882in" fo:min-width="0.28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ffbf00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3874in" fo:min-width="0.28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bread on the table of shewbread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Exodus 25:23</text:p>
            <text:p text:style-name="Table_20_Contents">Thou shalt also make a table of shittim wood: <text:span text:style-name="T1">two cubits</text:span> shall be the <text:span text:style-name="T1">length</text:span> thereof, and <text:span text:style-name="T1">a cubit</text:span> the <text:span text:style-name="T1">breadth</text:span> thereof, and a cubit and a half the height thereof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Leviticus 24:5-6</text:p>
            <text:p text:style-name="Table_20_Contents"><text:span text:style-name="T2">5</text:span> And thou shalt take fine flour, and bake twelve cakes thereof:<text:span text:style-name="T3"> two tenth deals </text:span>shall be in one cake.</text:p>
            <text:p text:style-name="Table_20_Contents"><text:span text:style-name="T2">6</text:span> And thou shalt set them in <text:span text:style-name="T1">two rows</text:span>, <text:span text:style-name="T1">six on a row</text:span>, upon the pure table before the LORD.</text:p>
          </table:table-cell>
        </table:table-row>
      </table:table>
      <text:p text:style-name="P3"/>
      <text:p text:style-name="P4"><draw:g text:anchor-type="as-char" draw:z-index="0" draw:name="Group object 1" draw:style-name="gr1"><draw:custom-shape draw:style-name="gr2" draw:text-style-name="P6" svg:width="5.4988in" svg:height="2.7524in" draw:transform="skewX (0.00122173047639604) rotate (0.471238898038469) translate (0.252083333333333in 2.93323490813648in)"><text:p text:style-name="P5"><text:span text:style-name="T4">648in.</text:span><text:span text:style-name="T5">2</text:span></text:p><draw:enhanced-geometry svg:viewBox="0 0 21600 21600" draw:type="rectangle" draw:enhanced-path="M 0 0 L 21600 0 21600 21600 0 21600 0 0 Z N"/></draw:custom-shape><draw:line draw:style-name="gr3" draw:text-style-name="P7" svg:x1="1.5268in" svg:y1="5.4059in" svg:x2="1.5268in" svg:y2="6.4748in"><text:p/></draw:line><draw:line draw:style-name="gr3" draw:text-style-name="P7" svg:x1="0.2512in" svg:y1="2.9783in" svg:x2="0.2512in" svg:y2="4.0472in"><text:p/></draw:line><draw:line draw:style-name="gr3" draw:text-style-name="P7" svg:x1="5.1047in" svg:y1="0.5091in" svg:x2="5.1047in" svg:y2="1.578in"><text:p/></draw:line><draw:line draw:style-name="gr3" draw:text-style-name="P7" svg:x1="6.4012in" svg:y1="2.889in" svg:x2="6.4012in" svg:y2="3.9579in"><text:p/></draw:line><draw:line draw:style-name="gr4" draw:text-style-name="P9" svg:x1="0in" svg:y1="2.5504in" svg:x2="4.874in" svg:y2="0in"><text:p text:style-name="P8"><text:span text:style-name="T6">2 cubits</text:span></text:p><text:p text:style-name="P8"><text:span text:style-name="T6">~36in. / 3ft.</text:span></text:p></draw:line><draw:line draw:style-name="gr4" draw:text-style-name="P10" svg:x1="5.576in" svg:y1="0.222in" svg:x2="6.8169in" svg:y2="2.6024in"><text:p text:style-name="P8"><text:span text:style-name="T7">1 cubit</text:span></text:p><text:p text:style-name="P8"><text:span text:style-name="T7">~18in. / 1.5ft.</text:span></text:p></draw:line><draw:custom-shape draw:style-name="gr5" draw:text-style-name="P11" svg:width="0.6878in" svg:height="0.6886in" svg:x="0.5752in" svg:y="2.9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6894in" svg:height="0.6886in" svg:x="1.4126in" svg:y="2.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1" svg:width="0.6878in" svg:height="0.6878in" svg:x="2.2193in" svg:y="2.0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1" svg:width="0.6878in" svg:height="0.6894in" svg:x="3.0689in" svg:y="1.6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0.687in" svg:height="0.6886in" svg:x="3.8799in" svg:y="1.3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0.6886in" svg:height="0.6886in" svg:x="4.6516in" svg:y="0.9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0.6886in" svg:height="0.687in" svg:x="5.3252in" svg:y="2.2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0.6878in" svg:height="0.6886in" svg:x="4.5783in" svg:y="2.6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6894in" svg:height="0.687in" svg:x="3.8047in" svg:y="2.9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1" svg:width="0.6878in" svg:height="0.6878in" svg:x="3.0854in" svg:y="3.3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1" svg:width="0.6886in" svg:height="0.6878in" svg:x="2.3102in" svg:y="3.7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0.6886in" svg:height="0.6886in" svg:x="1.4283in" svg:y="4.2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list text:style-name="L1">
        <text:list-item>
          <text:p text:style-name="P12">If there was a ½ inch gap between each piece of bread, and a ½ inch gap on the outer edges, each piece of bread would have a 5 inch diameter.</text:p>
        </text:list-item>
        <text:list-item>
          <text:p text:style-name="P13">If there was a ¼ inch gap between each piece of bread, and <text:span text:style-name="T8">3/8</text:span> inch gap on the outer edges, each piece of bread would have a 5.5 inch diameter.</text:p>
        </text:list-item>
        <text:list-item>
          <text:p text:style-name="P14">The maximum comfortable diameter for each piece that still fits on the table is ~5.92 inches.</text:p>
        </text:list-item>
      </text:list>
      <text:p text:style-name="P15"/>
      <text:p text:style-name="P16">If each piece of bread were instead a square, the maximum dimensions for each piece (allowing for a minimum of a ¼ inch gap on the outer edges) is 5.92 inches x 5.92 inches <text:span text:style-name="T9">(5 11/12 x 5 11/12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6:40:44.353310233</meta:creation-date>
    <dc:title>The bread on the table of shewbread</dc:title>
    <meta:editing-duration>PT25M7S</meta:editing-duration>
    <meta:editing-cycles>20</meta:editing-cycles>
    <meta:generator>LibreOffice/26.2.4.2$Linux_X86_64 LibreOffice_project/64a984c51f4702dbd3710b13428c673a2f1292e7</meta:generator>
    <dc:date>2026-07-11T12:30:02.426409389</dc:date>
    <meta:document-statistic meta:table-count="2" meta:image-count="0" meta:object-count="0" meta:page-count="1" meta:paragraph-count="11" meta:word-count="201" meta:character-count="988" meta:non-whitespace-character-count="800"/>
    <meta:template xlink:type="simple" xlink:actuate="onRequest" xlink:title="default" xlink:href="../../../../Templates/default.ott" meta:date="2026-05-22T16:40:42.923726321"/>
  </office:meta>
</office:document-meta>
</file>