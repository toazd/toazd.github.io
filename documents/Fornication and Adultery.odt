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8.2in" table:align="margins"/>
    </style:style>
    <style:style style:name="Table7.A" style:family="table-column">
      <style:table-column-properties style:column-width="8.2in" style:rel-column-width="65535*"/>
    </style:style>
    <style:style style:name="Table7.A1" style:family="table-cell">
      <style:table-cell-properties fo:padding="0.0382in" fo:border="0.5pt solid #000000"/>
    </style:style>
    <style:style style:name="Table8" style:family="table">
      <style:table-properties style:width="8.2in" table:align="margins"/>
    </style:style>
    <style:style style:name="Table8.A" style:family="table-column">
      <style:table-column-properties style:column-width="8.2in" style:rel-column-width="65535*"/>
    </style:style>
    <style:style style:name="Table8.A1" style:family="table-cell">
      <style:table-cell-properties fo:padding="0.0382in" fo:border="0.5pt solid #000000"/>
    </style:style>
    <style:style style:name="Table1" style:family="table">
      <style:table-properties style:width="8.2in" table:align="margins"/>
    </style:style>
    <style:style style:name="Table1.A" style:family="table-column">
      <style:table-column-properties style:column-width="4.1in" style:rel-column-width="32767*"/>
    </style:style>
    <style:style style:name="Table1.B" style:family="table-column">
      <style:table-column-properties style:column-width="4.1in" style:rel-column-width="32768*"/>
    </style:style>
    <style:style style:name="Table1.1" style:family="table-row">
      <style:table-row-properties fo:keep-together="always"/>
    </style:style>
    <style:style style:name="Table1.A1" style:family="table-cell">
      <style:table-cell-properties style:vertical-align="middle" fo:padding="0.0382in" fo:border-left="0.75pt solid #000000" fo:border-right="none" fo:border-top="0.75pt solid #000000" fo:border-bottom="0.75pt solid #000000"/>
    </style:style>
    <style:style style:name="Table1.B1" style:family="table-cell">
      <style:table-cell-properties style:vertical-align="middle" fo:padding="0.0382in" fo:border="0.75pt solid #000000"/>
    </style:style>
    <style:style style:name="Table1.A2" style:family="table-cell">
      <style:table-cell-properties style:vertical-align="middle" fo:padding="0.0382in" fo:border-left="0.75pt solid #000000" fo:border-right="none" fo:border-top="none" fo:border-bottom="0.75pt solid #000000"/>
    </style:style>
    <style:style style:name="Table1.B2" style:family="table-cell">
      <style:table-cell-properties style:vertical-align="middle" fo:padding="0.0382in" fo:border-left="0.75pt solid #000000" fo:border-right="0.75pt solid #000000" fo:border-top="none" fo:border-bottom="0.75pt solid #000000"/>
    </style:style>
    <style:style style:name="Table2" style:family="table">
      <style:table-properties style:width="8.2in"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10" style:family="table">
      <style:table-properties style:width="8.2in" table:align="margins"/>
    </style:style>
    <style:style style:name="Table10.A" style:family="table-column">
      <style:table-column-properties style:column-width="8.2in" style:rel-column-width="65535*"/>
    </style:style>
    <style:style style:name="Table10.A1" style:family="table-cell">
      <style:table-cell-properties fo:padding="0.0382in" fo:border="0.5pt solid #000000"/>
    </style:style>
    <style:style style:name="Table9" style:family="table">
      <style:table-properties style:width="8.2in" table:align="margins"/>
    </style:style>
    <style:style style:name="Table9.A" style:family="table-column">
      <style:table-column-properties style:column-width="8.2in" style:rel-column-width="65535*"/>
    </style:style>
    <style:style style:name="Table9.A1" style:family="table-cell">
      <style:table-cell-properties fo:padding="0.0382in" fo:border="0.5pt solid #000000"/>
    </style:style>
    <style:style style:name="Table11" style:family="table">
      <style:table-properties style:width="8.2in" table:align="margins"/>
    </style:style>
    <style:style style:name="Table11.A" style:family="table-column">
      <style:table-column-properties style:column-width="8.2in" style:rel-column-width="65535*"/>
    </style:style>
    <style:style style:name="Table11.A1" style:family="table-cell">
      <style:table-cell-properties fo:padding="0.0382in" fo:border="0.5pt solid #000000"/>
    </style:style>
    <style:style style:name="Table12" style:family="table">
      <style:table-properties style:width="8.2in" table:align="margins"/>
    </style:style>
    <style:style style:name="Table12.A" style:family="table-column">
      <style:table-column-properties style:column-width="8.2in" style:rel-column-width="65535*"/>
    </style:style>
    <style:style style:name="Table12.A1" style:family="table-cell">
      <style:table-cell-properties fo:padding="0.0382in" fo:border="0.5pt solid #000000"/>
    </style:style>
    <style:style style:name="Table13" style:family="table">
      <style:table-properties style:width="8.2in" table:align="margins"/>
    </style:style>
    <style:style style:name="Table13.A" style:family="table-column">
      <style:table-column-properties style:column-width="8.2in" style:rel-column-width="65535*"/>
    </style:style>
    <style:style style:name="Table13.A1" style:family="table-cell">
      <style:table-cell-properties fo:padding="0.0382in" fo:border="0.5pt solid #000000"/>
    </style:style>
    <style:style style:name="Table14" style:family="table">
      <style:table-properties style:width="8.2in" table:align="margins"/>
    </style:style>
    <style:style style:name="Table14.A" style:family="table-column">
      <style:table-column-properties style:column-width="8.2in" style:rel-column-width="65535*"/>
    </style:style>
    <style:style style:name="Table14.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officeooo:rsid="00cb02ab" officeooo:paragraph-rsid="00cb02ab"/>
    </style:style>
    <style:style style:name="P2" style:family="paragraph" style:parent-style-name="Standard">
      <style:paragraph-properties fo:text-align="center" style:justify-single-word="false"/>
      <style:text-properties style:font-name="Gabriela" officeooo:rsid="00d7f4c0" officeooo:paragraph-rsid="00d7f4c0"/>
    </style:style>
    <style:style style:name="P3" style:family="paragraph" style:parent-style-name="Standard">
      <style:paragraph-properties fo:text-align="center" style:justify-single-word="false"/>
      <style:text-properties officeooo:paragraph-rsid="00b48b4f"/>
    </style:style>
    <style:style style:name="P4" style:family="paragraph" style:parent-style-name="Standard">
      <style:text-properties officeooo:rsid="00d7f4c0" officeooo:paragraph-rsid="00d7f4c0"/>
    </style:style>
    <style:style style:name="P5" style:family="paragraph" style:parent-style-name="Table_20_Contents">
      <style:text-properties officeooo:paragraph-rsid="00b5ef14"/>
    </style:style>
    <style:style style:name="P6" style:family="paragraph" style:parent-style-name="Table_20_Contents">
      <style:text-properties officeooo:rsid="00b5ef14" officeooo:paragraph-rsid="00b5ef14"/>
    </style:style>
    <style:style style:name="P7" style:family="paragraph" style:parent-style-name="Standard" style:list-style-name="L1">
      <style:text-properties officeooo:rsid="00b5ef14" officeooo:paragraph-rsid="00b5ef14"/>
    </style:style>
    <style:style style:name="P8" style:family="paragraph" style:parent-style-name="Standard" style:list-style-name="L1">
      <style:text-properties officeooo:paragraph-rsid="0182c061"/>
    </style:style>
    <style:style style:name="P9" style:family="paragraph" style:parent-style-name="Standard" style:list-style-name="L2">
      <style:text-properties officeooo:rsid="0181564d" officeooo:paragraph-rsid="0181564d"/>
    </style:style>
    <style:style style:name="P10" style:family="paragraph" style:parent-style-name="Standard" style:list-style-name="L2">
      <style:text-properties officeooo:paragraph-rsid="0181564d"/>
    </style:style>
    <style:style style:name="P11" style:family="paragraph" style:parent-style-name="Standard">
      <style:text-properties officeooo:rsid="00b5ef14" officeooo:paragraph-rsid="00b5ef14"/>
    </style:style>
    <style:style style:name="P12" style:family="paragraph" style:parent-style-name="Standard">
      <style:paragraph-properties fo:text-align="center" style:justify-single-word="false"/>
      <style:text-properties style:font-name="Gabriela" officeooo:rsid="00d8ca52" officeooo:paragraph-rsid="00d8ca52"/>
    </style:style>
    <style:style style:name="P13" style:family="paragraph" style:parent-style-name="Table_20_Contents">
      <style:text-properties officeooo:rsid="00ee5765" officeooo:paragraph-rsid="00ee5765"/>
    </style:style>
    <style:style style:name="P14" style:family="paragraph" style:parent-style-name="Table_20_Contents">
      <style:text-properties officeooo:rsid="00ef55ff" officeooo:paragraph-rsid="00ef55ff"/>
    </style:style>
    <style:style style:name="P15" style:family="paragraph" style:parent-style-name="Table_20_Contents">
      <style:text-properties officeooo:rsid="00eb0898" officeooo:paragraph-rsid="00eb0898"/>
    </style:style>
    <style:style style:name="P16" style:family="paragraph" style:parent-style-name="Table_20_Contents">
      <style:text-properties officeooo:rsid="00f00b8f" officeooo:paragraph-rsid="00f0d86a"/>
    </style:style>
    <style:style style:name="P17" style:family="paragraph" style:parent-style-name="Table_20_Contents">
      <style:text-properties officeooo:rsid="00e919c7" officeooo:paragraph-rsid="00f00b8f"/>
    </style:style>
    <style:style style:name="P18" style:family="paragraph" style:parent-style-name="Table_20_Contents">
      <style:text-properties officeooo:rsid="01002c09" officeooo:paragraph-rsid="01002c09"/>
    </style:style>
    <style:style style:name="P19" style:family="paragraph" style:parent-style-name="Standard" style:list-style-name="L3">
      <style:text-properties officeooo:rsid="00d8ca52" officeooo:paragraph-rsid="00d8ca52"/>
    </style:style>
    <style:style style:name="P20" style:family="paragraph" style:parent-style-name="Standard" style:list-style-name="L3">
      <style:text-properties officeooo:rsid="00da9d50" officeooo:paragraph-rsid="00da9d50"/>
    </style:style>
    <style:style style:name="P21" style:family="paragraph" style:parent-style-name="Standard" style:list-style-name="L3">
      <style:text-properties officeooo:rsid="00f837f8" officeooo:paragraph-rsid="00f837f8"/>
    </style:style>
    <style:style style:name="P22" style:family="paragraph" style:parent-style-name="Standard">
      <style:paragraph-properties fo:text-align="center" style:justify-single-word="false"/>
      <style:text-properties style:font-name="Gabriela" officeooo:rsid="00da9d50" officeooo:paragraph-rsid="00da9d50"/>
    </style:style>
    <style:style style:name="P23" style:family="paragraph" style:parent-style-name="Table_20_Contents">
      <style:text-properties officeooo:paragraph-rsid="01050ea5"/>
    </style:style>
    <style:style style:name="P24" style:family="paragraph" style:parent-style-name="Table_20_Contents">
      <style:text-properties officeooo:rsid="00e7b585" officeooo:paragraph-rsid="01069d6b"/>
    </style:style>
    <style:style style:name="P25" style:family="paragraph" style:parent-style-name="Table_20_Contents">
      <style:text-properties officeooo:rsid="0103e92f" officeooo:paragraph-rsid="0103e92f"/>
    </style:style>
    <style:style style:name="P26" style:family="paragraph" style:parent-style-name="Table_20_Contents">
      <style:text-properties officeooo:rsid="00e5af1f" officeooo:paragraph-rsid="00e5af1f"/>
    </style:style>
    <style:style style:name="P27" style:family="paragraph" style:parent-style-name="Table_20_Contents">
      <style:text-properties officeooo:rsid="00e077c6" officeooo:paragraph-rsid="01069d6b"/>
    </style:style>
    <style:style style:name="P28" style:family="paragraph" style:parent-style-name="Standard" style:list-style-name="L4">
      <style:text-properties officeooo:rsid="00dc3818" officeooo:paragraph-rsid="00dc3818"/>
    </style:style>
    <style:style style:name="P29" style:family="paragraph" style:parent-style-name="Standard">
      <style:paragraph-properties fo:text-align="center" style:justify-single-word="false"/>
      <style:text-properties officeooo:paragraph-rsid="00617f26"/>
    </style:style>
    <style:style style:name="P30" style:family="paragraph" style:parent-style-name="Table_20_Contents">
      <style:text-properties officeooo:paragraph-rsid="0120d2df"/>
    </style:style>
    <style:style style:name="P31" style:family="paragraph" style:parent-style-name="Table_20_Contents">
      <style:text-properties officeooo:rsid="001f17c8" officeooo:paragraph-rsid="001f17c8"/>
    </style:style>
    <style:style style:name="P32" style:family="paragraph" style:parent-style-name="Table_20_Contents">
      <style:text-properties officeooo:rsid="002067e3" officeooo:paragraph-rsid="002067e3"/>
    </style:style>
    <style:style style:name="P33" style:family="paragraph" style:parent-style-name="Table_20_Contents">
      <style:text-properties officeooo:rsid="003e3a92" officeooo:paragraph-rsid="0052706f"/>
    </style:style>
    <style:style style:name="P34" style:family="paragraph" style:parent-style-name="Table_20_Contents">
      <style:text-properties officeooo:rsid="003e3a92" officeooo:paragraph-rsid="003e3a92"/>
    </style:style>
    <style:style style:name="P35" style:family="paragraph" style:parent-style-name="Table_20_Contents">
      <style:text-properties officeooo:rsid="00434bc9" officeooo:paragraph-rsid="00434bc9"/>
    </style:style>
    <style:style style:name="P36" style:family="paragraph" style:parent-style-name="Table_20_Contents">
      <style:text-properties officeooo:rsid="00292c13" officeooo:paragraph-rsid="00292c13"/>
    </style:style>
    <style:style style:name="P37" style:family="paragraph" style:parent-style-name="Table_20_Contents">
      <style:text-properties officeooo:rsid="0058491e" officeooo:paragraph-rsid="0058491e"/>
    </style:style>
    <style:style style:name="P38" style:family="paragraph" style:parent-style-name="Table_20_Contents">
      <style:text-properties officeooo:rsid="002620b6" officeooo:paragraph-rsid="002620b6"/>
    </style:style>
    <style:style style:name="P39" style:family="paragraph" style:parent-style-name="Table_20_Contents">
      <style:text-properties officeooo:paragraph-rsid="019461fb"/>
    </style:style>
    <style:style style:name="P40" style:family="paragraph" style:parent-style-name="Table_20_Contents">
      <style:text-properties officeooo:rsid="002c589b" officeooo:paragraph-rsid="002c589b"/>
    </style:style>
    <style:style style:name="P41" style:family="paragraph" style:parent-style-name="Table_20_Contents">
      <style:text-properties officeooo:paragraph-rsid="00ab3284"/>
    </style:style>
    <style:style style:name="P42" style:family="paragraph" style:parent-style-name="Table_20_Contents">
      <style:text-properties officeooo:rsid="009e57f1" officeooo:paragraph-rsid="009e57f1"/>
    </style:style>
    <style:style style:name="P43" style:family="paragraph" style:parent-style-name="Table_20_Contents">
      <style:text-properties officeooo:rsid="009fe2d5" officeooo:paragraph-rsid="009fe2d5"/>
    </style:style>
    <style:style style:name="P44" style:family="paragraph" style:parent-style-name="Table_20_Contents">
      <style:text-properties officeooo:rsid="00a1c5c9" officeooo:paragraph-rsid="00a1c5c9"/>
    </style:style>
    <style:style style:name="P45" style:family="paragraph" style:parent-style-name="Standard" style:list-style-name="L5">
      <style:text-properties officeooo:paragraph-rsid="006f4e61"/>
    </style:style>
    <style:style style:name="P46" style:family="paragraph" style:parent-style-name="Standard" style:list-style-name="L5">
      <style:text-properties officeooo:rsid="0064e02f" officeooo:paragraph-rsid="006f4e61"/>
    </style:style>
    <style:style style:name="P47" style:family="paragraph" style:parent-style-name="Standard" style:list-style-name="L5">
      <style:text-properties officeooo:rsid="006cd827" officeooo:paragraph-rsid="006cd827"/>
    </style:style>
    <style:style style:name="P48" style:family="paragraph" style:parent-style-name="Standard" style:list-style-name="L5">
      <style:text-properties officeooo:rsid="006cd827" officeooo:paragraph-rsid="014f3814"/>
    </style:style>
    <style:style style:name="P49" style:family="paragraph" style:parent-style-name="Standard">
      <style:text-properties officeooo:rsid="007be5fb" officeooo:paragraph-rsid="007be5fb"/>
    </style:style>
    <style:style style:name="P50" style:family="paragraph" style:parent-style-name="Standard" style:list-style-name="L6">
      <style:text-properties officeooo:rsid="008bc633" officeooo:paragraph-rsid="008bc633"/>
    </style:style>
    <style:style style:name="P51" style:family="paragraph" style:parent-style-name="Standard">
      <style:text-properties officeooo:rsid="008bc633" officeooo:paragraph-rsid="008bc633"/>
    </style:style>
    <style:style style:name="P52" style:family="paragraph" style:parent-style-name="Standard">
      <style:paragraph-properties fo:text-align="center" style:justify-single-word="false"/>
      <style:text-properties style:font-name="Gabriela" officeooo:rsid="0098aded" officeooo:paragraph-rsid="0098aded"/>
    </style:style>
    <style:style style:name="P53" style:family="paragraph" style:parent-style-name="Standard" style:list-style-name="L7">
      <style:text-properties officeooo:rsid="009a9ce9" officeooo:paragraph-rsid="009a9ce9"/>
    </style:style>
    <style:style style:name="P54" style:family="paragraph" style:parent-style-name="Standard" style:list-style-name="L7">
      <style:text-properties officeooo:rsid="0162d95f" officeooo:paragraph-rsid="0162d95f"/>
    </style:style>
    <style:style style:name="P55" style:family="paragraph" style:parent-style-name="Standard">
      <style:text-properties officeooo:rsid="015793a8" officeooo:paragraph-rsid="015793a8"/>
    </style:style>
    <style:style style:name="P56" style:family="paragraph" style:parent-style-name="Standard" style:list-style-name="L8">
      <style:text-properties officeooo:rsid="015b2ba9" officeooo:paragraph-rsid="015b2ba9"/>
    </style:style>
    <style:style style:name="P57" style:family="paragraph" style:parent-style-name="Standard" style:list-style-name="L7">
      <style:text-properties officeooo:rsid="009a9ce9" officeooo:paragraph-rsid="0165bafb"/>
    </style:style>
    <style:style style:name="P58" style:family="paragraph" style:parent-style-name="Standard">
      <style:text-properties officeooo:rsid="009a9ce9" officeooo:paragraph-rsid="0165bafb"/>
    </style:style>
    <style:style style:name="P59" style:family="paragraph" style:parent-style-name="Standard" style:list-style-name="L9">
      <style:text-properties officeooo:rsid="015ee3c1" officeooo:paragraph-rsid="015ee3c1"/>
    </style:style>
    <style:style style:name="P60" style:family="paragraph" style:parent-style-name="Standard">
      <style:text-properties officeooo:rsid="015ee3c1" officeooo:paragraph-rsid="015ee3c1"/>
    </style:style>
    <style:style style:name="P61" style:family="paragraph" style:parent-style-name="Standard" style:list-style-name="L10">
      <style:text-properties officeooo:rsid="01669f14" officeooo:paragraph-rsid="01669f14"/>
    </style:style>
    <style:style style:name="P62" style:family="paragraph" style:parent-style-name="Standard">
      <style:text-properties officeooo:rsid="01669f14" officeooo:paragraph-rsid="01669f14"/>
    </style:style>
    <style:style style:name="P63" style:family="paragraph" style:parent-style-name="Standard">
      <style:paragraph-properties fo:text-align="center" style:justify-single-word="false"/>
      <style:text-properties style:font-name="Gabriela" officeooo:rsid="0098aded" officeooo:paragraph-rsid="01671f80"/>
    </style:style>
    <style:style style:name="P64" style:family="paragraph" style:parent-style-name="Standard" style:list-style-name="L11">
      <style:text-properties officeooo:rsid="0168f76a" officeooo:paragraph-rsid="016d740c"/>
    </style:style>
    <style:style style:name="P65" style:family="paragraph" style:parent-style-name="Standard" style:list-style-name="L11">
      <style:text-properties officeooo:rsid="016daeca" officeooo:paragraph-rsid="016daeca"/>
    </style:style>
    <style:style style:name="P66" style:family="paragraph" style:parent-style-name="Standard">
      <style:text-properties officeooo:rsid="0168f76a" officeooo:paragraph-rsid="0168f76a"/>
    </style:style>
    <style:style style:name="P67" style:family="paragraph" style:parent-style-name="Table_20_Contents">
      <style:text-properties fo:color="#127622" loext:opacity="100%" officeooo:paragraph-rsid="016b28d9"/>
    </style:style>
    <style:style style:name="P68" style:family="paragraph" style:parent-style-name="Table_20_Contents">
      <style:text-properties officeooo:paragraph-rsid="016b28d9"/>
    </style:style>
    <style:style style:name="P69" style:family="paragraph" style:parent-style-name="Standard" style:list-style-name="L12">
      <style:text-properties officeooo:rsid="0169ab9c" officeooo:paragraph-rsid="0169ab9c"/>
    </style:style>
    <style:style style:name="P70" style:family="paragraph" style:parent-style-name="Standard" style:list-style-name="L12">
      <style:text-properties officeooo:rsid="016daeca" officeooo:paragraph-rsid="016daeca"/>
    </style:style>
    <style:style style:name="T1" style:family="text">
      <style:text-properties style:font-name="Gabriela" style:text-underline-style="solid" style:text-underline-width="auto" style:text-underline-color="font-color" officeooo:rsid="00baf3d1"/>
    </style:style>
    <style:style style:name="T2" style:family="text">
      <style:text-properties style:font-name="Gabriela" style:text-underline-style="solid" style:text-underline-width="auto" style:text-underline-color="font-color" officeooo:rsid="00b48b4f"/>
    </style:style>
    <style:style style:name="T3" style:family="text">
      <style:text-properties fo:color="#127622" loext:opacity="100%"/>
    </style:style>
    <style:style style:name="T4" style:family="text">
      <style:text-properties fo:color="#127622" loext:opacity="100%" officeooo:rsid="00b590d7"/>
    </style:style>
    <style:style style:name="T5" style:family="text">
      <style:text-properties fo:background-color="#ffff00" loext:char-shading-value="0"/>
    </style:style>
    <style:style style:name="T6" style:family="text">
      <style:text-properties fo:background-color="#fff5ce" loext:char-shading-value="0"/>
    </style:style>
    <style:style style:name="T7" style:family="text">
      <style:text-properties style:text-position="super 58%"/>
    </style:style>
    <style:style style:name="T8" style:family="text">
      <style:text-properties fo:background-color="#dee6ef" loext:char-shading-value="0"/>
    </style:style>
    <style:style style:name="T9" style:family="text">
      <style:text-properties fo:font-style="italic" style:font-style-asian="italic" style:font-style-complex="italic"/>
    </style:style>
    <style:style style:name="T10" style:family="text">
      <style:text-properties officeooo:rsid="00b7ced3"/>
    </style:style>
    <style:style style:name="T11" style:family="text">
      <style:text-properties officeooo:rsid="01741b3d"/>
    </style:style>
    <style:style style:name="T12" style:family="text">
      <style:text-properties officeooo:rsid="01a7b15b"/>
    </style:style>
    <style:style style:name="T13" style:family="text">
      <style:text-properties fo:font-style="normal" officeooo:rsid="017ba744" style:font-style-asian="normal" style:font-style-complex="normal"/>
    </style:style>
    <style:style style:name="T14" style:family="text">
      <style:text-properties fo:font-style="normal" fo:font-weight="bold" officeooo:rsid="017ba744" style:font-style-asian="normal" style:font-weight-asian="bold" style:font-style-complex="normal" style:font-weight-complex="bold"/>
    </style:style>
    <style:style style:name="T15" style:family="text">
      <style:text-properties fo:font-style="normal" officeooo:rsid="017d9b75" style:font-style-asian="normal" style:font-style-complex="normal"/>
    </style:style>
    <style:style style:name="T16" style:family="text">
      <style:text-properties fo:font-style="normal" officeooo:rsid="0181564d" style:font-style-asian="normal" style:font-style-complex="normal"/>
    </style:style>
    <style:style style:name="T17" style:family="text">
      <style:text-properties officeooo:rsid="01882ec2"/>
    </style:style>
    <style:style style:name="T18" style:family="text">
      <style:text-properties fo:color="#127622" loext:opacity="100%" fo:font-style="normal" officeooo:rsid="017d9b75" style:font-style-asian="normal" style:font-style-complex="normal"/>
    </style:style>
    <style:style style:name="T19" style:family="text">
      <style:text-properties fo:color="#127622" loext:opacity="100%" fo:font-style="normal" officeooo:rsid="01ab401d" style:font-style-asian="normal" style:font-style-complex="normal"/>
    </style:style>
    <style:style style:name="T20" style:family="text">
      <style:text-properties fo:color="#127622" loext:opacity="100%" fo:font-style="normal" officeooo:rsid="017f1eb0" style:font-style-asian="normal" style:font-style-complex="normal"/>
    </style:style>
    <style:style style:name="T21" style:family="text">
      <style:text-properties fo:font-style="normal" officeooo:rsid="017f1eb0" style:font-style-asian="normal" style:font-style-complex="normal"/>
    </style:style>
    <style:style style:name="T22" style:family="text">
      <style:text-properties officeooo:rsid="017fe75e"/>
    </style:style>
    <style:style style:name="T23" style:family="text">
      <style:text-properties fo:font-weight="normal" officeooo:rsid="017fe75e" style:font-weight-asian="normal" style:font-weight-complex="normal"/>
    </style:style>
    <style:style style:name="T24" style:family="text">
      <style:text-properties officeooo:rsid="01866185"/>
    </style:style>
    <style:style style:name="T25" style:family="text">
      <style:text-properties officeooo:rsid="018945fd"/>
    </style:style>
    <style:style style:name="T26" style:family="text">
      <style:text-properties officeooo:rsid="00ee5765"/>
    </style:style>
    <style:style style:name="T27" style:family="text">
      <style:text-properties officeooo:rsid="00ec87bf"/>
    </style:style>
    <style:style style:name="T28" style:family="text">
      <style:text-properties officeooo:rsid="0119624a"/>
    </style:style>
    <style:style style:name="T29" style:family="text">
      <style:text-properties fo:color="#127622" loext:opacity="100%" officeooo:rsid="00f0d86a"/>
    </style:style>
    <style:style style:name="T30" style:family="text">
      <style:text-properties officeooo:rsid="00ef55ff"/>
    </style:style>
    <style:style style:name="T31" style:family="text">
      <style:text-properties officeooo:rsid="010124c1"/>
    </style:style>
    <style:style style:name="T32" style:family="text">
      <style:text-properties officeooo:rsid="010217f1"/>
    </style:style>
    <style:style style:name="T33" style:family="text">
      <style:text-properties officeooo:rsid="011a7f5f"/>
    </style:style>
    <style:style style:name="T34" style:family="text">
      <style:text-properties officeooo:rsid="018add4f"/>
    </style:style>
    <style:style style:name="T35" style:family="text">
      <style:text-properties officeooo:rsid="011b267e"/>
    </style:style>
    <style:style style:name="T36" style:family="text">
      <style:text-properties fo:color="#127622" loext:opacity="100%" officeooo:rsid="011b267e"/>
    </style:style>
    <style:style style:name="T37" style:family="text">
      <style:text-properties fo:color="#127622" loext:opacity="100%" officeooo:rsid="00e05b33"/>
    </style:style>
    <style:style style:name="T38" style:family="text">
      <style:text-properties officeooo:rsid="00e876af"/>
    </style:style>
    <style:style style:name="T39" style:family="text">
      <style:text-properties officeooo:rsid="010939c4"/>
    </style:style>
    <style:style style:name="T40" style:family="text">
      <style:text-properties officeooo:rsid="00e05b33"/>
    </style:style>
    <style:style style:name="T41" style:family="text">
      <style:text-properties officeooo:rsid="00e7b585"/>
    </style:style>
    <style:style style:name="T42" style:family="text">
      <style:text-properties officeooo:rsid="00e12fdc"/>
    </style:style>
    <style:style style:name="T43" style:family="text">
      <style:text-properties fo:color="#127622" loext:opacity="100%" officeooo:rsid="00e1d1e3"/>
    </style:style>
    <style:style style:name="T44" style:family="text">
      <style:text-properties fo:color="#127622" loext:opacity="100%" officeooo:rsid="010a42f6"/>
    </style:style>
    <style:style style:name="T45" style:family="text">
      <style:text-properties fo:color="#127622" loext:opacity="100%" officeooo:rsid="01076d13"/>
    </style:style>
    <style:style style:name="T46" style:family="text">
      <style:text-properties fo:color="#127622" loext:opacity="100%" officeooo:rsid="00e6dd50"/>
    </style:style>
    <style:style style:name="T47" style:family="text">
      <style:text-properties officeooo:rsid="00e6dd50"/>
    </style:style>
    <style:style style:name="T48" style:family="text">
      <style:text-properties officeooo:rsid="011d89f7"/>
    </style:style>
    <style:style style:name="T49" style:family="text">
      <style:text-properties officeooo:rsid="010b67cb"/>
    </style:style>
    <style:style style:name="T50" style:family="text">
      <style:text-properties officeooo:rsid="010efb10"/>
    </style:style>
    <style:style style:name="T51" style:family="text">
      <style:text-properties officeooo:rsid="00dd64d6"/>
    </style:style>
    <style:style style:name="T52" style:family="text">
      <style:text-properties style:font-name="Gabriela" officeooo:rsid="00617f26"/>
    </style:style>
    <style:style style:name="T53" style:family="text">
      <style:text-properties officeooo:rsid="001c4b7e"/>
    </style:style>
    <style:style style:name="T54" style:family="text">
      <style:text-properties officeooo:rsid="00318a90"/>
    </style:style>
    <style:style style:name="T55" style:family="text">
      <style:text-properties officeooo:rsid="00afe55e"/>
    </style:style>
    <style:style style:name="T56" style:family="text">
      <style:text-properties officeooo:rsid="011e7f16"/>
    </style:style>
    <style:style style:name="T57" style:family="text">
      <style:text-properties officeooo:rsid="011eb670"/>
    </style:style>
    <style:style style:name="T58" style:family="text">
      <style:text-properties officeooo:rsid="011ff16c"/>
    </style:style>
    <style:style style:name="T59" style:family="text">
      <style:text-properties fo:color="#ff0000" loext:opacity="100%" officeooo:rsid="011ff16c"/>
    </style:style>
    <style:style style:name="T60" style:family="text">
      <style:text-properties fo:color="#127622" loext:opacity="100%" officeooo:rsid="011ff16c"/>
    </style:style>
    <style:style style:name="T61" style:family="text">
      <style:text-properties fo:color="#127622" loext:opacity="100%" officeooo:rsid="003d6cee"/>
    </style:style>
    <style:style style:name="T62" style:family="text">
      <style:text-properties officeooo:rsid="001fc4f6"/>
    </style:style>
    <style:style style:name="T63" style:family="text">
      <style:text-properties fo:color="#127622" loext:opacity="100%" officeooo:rsid="004f5183"/>
    </style:style>
    <style:style style:name="T64" style:family="text">
      <style:text-properties officeooo:rsid="0046d21d"/>
    </style:style>
    <style:style style:name="T65" style:family="text">
      <style:text-properties officeooo:rsid="00401eac"/>
    </style:style>
    <style:style style:name="T66" style:family="text">
      <style:text-properties officeooo:rsid="00420fe8"/>
    </style:style>
    <style:style style:name="T67" style:family="text">
      <style:text-properties officeooo:rsid="018fbe3b"/>
    </style:style>
    <style:style style:name="T68" style:family="text">
      <style:text-properties officeooo:rsid="00490b18"/>
    </style:style>
    <style:style style:name="T69" style:family="text">
      <style:text-properties officeooo:rsid="00497773"/>
    </style:style>
    <style:style style:name="T70" style:family="text">
      <style:text-properties officeooo:rsid="012cdc76"/>
    </style:style>
    <style:style style:name="T71" style:family="text">
      <style:text-properties officeooo:rsid="004850da"/>
    </style:style>
    <style:style style:name="T72" style:family="text">
      <style:text-properties officeooo:rsid="004d04cc"/>
    </style:style>
    <style:style style:name="T73" style:family="text">
      <style:text-properties officeooo:rsid="0192bc91"/>
    </style:style>
    <style:style style:name="T74" style:family="text">
      <style:text-properties officeooo:rsid="012d16c9"/>
    </style:style>
    <style:style style:name="T75" style:family="text">
      <style:text-properties officeooo:rsid="0053dd9f"/>
    </style:style>
    <style:style style:name="T76" style:family="text">
      <style:text-properties officeooo:rsid="003490cc"/>
    </style:style>
    <style:style style:name="T77" style:family="text">
      <style:text-properties officeooo:rsid="012f5fc0"/>
    </style:style>
    <style:style style:name="T78" style:family="text">
      <style:text-properties officeooo:rsid="00568e86"/>
    </style:style>
    <style:style style:name="T79" style:family="text">
      <style:text-properties officeooo:rsid="00362bf4"/>
    </style:style>
    <style:style style:name="T80" style:family="text">
      <style:text-properties officeooo:rsid="002a1118"/>
    </style:style>
    <style:style style:name="T81" style:family="text">
      <style:text-properties officeooo:rsid="00592886"/>
    </style:style>
    <style:style style:name="T82" style:family="text">
      <style:text-properties officeooo:rsid="012f9ede"/>
    </style:style>
    <style:style style:name="T83" style:family="text">
      <style:text-properties officeooo:rsid="002bf9b9"/>
    </style:style>
    <style:style style:name="T84" style:family="text">
      <style:text-properties officeooo:rsid="0130eff8"/>
    </style:style>
    <style:style style:name="T85" style:family="text">
      <style:text-properties officeooo:rsid="00392fc1"/>
    </style:style>
    <style:style style:name="T86" style:family="text">
      <style:text-properties officeooo:rsid="013080e8"/>
    </style:style>
    <style:style style:name="T87" style:family="text">
      <style:text-properties officeooo:rsid="003ae21f"/>
    </style:style>
    <style:style style:name="T88" style:family="text">
      <style:text-properties fo:color="#ff0000" loext:opacity="100%"/>
    </style:style>
    <style:style style:name="T89" style:family="text">
      <style:text-properties fo:color="#ff0000" loext:opacity="100%" fo:background-color="#ffff00" loext:char-shading-value="0"/>
    </style:style>
    <style:style style:name="T90" style:family="text">
      <style:text-properties officeooo:rsid="002c589b"/>
    </style:style>
    <style:style style:name="T91" style:family="text">
      <style:text-properties officeooo:rsid="00ab840a"/>
    </style:style>
    <style:style style:name="T92" style:family="text">
      <style:text-properties officeooo:rsid="013e79c1"/>
    </style:style>
    <style:style style:name="T93" style:family="text">
      <style:text-properties officeooo:rsid="005e108b"/>
    </style:style>
    <style:style style:name="T94" style:family="text">
      <style:text-properties officeooo:rsid="00aad827"/>
    </style:style>
    <style:style style:name="T95" style:family="text">
      <style:text-properties fo:font-style="italic" officeooo:rsid="002c589b" style:font-style-asian="italic" style:font-style-complex="italic"/>
    </style:style>
    <style:style style:name="T96" style:family="text">
      <style:text-properties fo:font-style="italic" officeooo:rsid="014191f8" style:font-style-asian="italic" style:font-style-complex="italic"/>
    </style:style>
    <style:style style:name="T97" style:family="text">
      <style:text-properties officeooo:rsid="01347686"/>
    </style:style>
    <style:style style:name="T98" style:family="text">
      <style:text-properties fo:font-weight="bold" officeooo:rsid="01347686" style:font-weight-asian="bold" style:font-weight-complex="bold"/>
    </style:style>
    <style:style style:name="T99" style:family="text">
      <style:text-properties fo:color="#127622" loext:opacity="100%" officeooo:rsid="00e7b585"/>
    </style:style>
    <style:style style:name="T100" style:family="text">
      <style:text-properties officeooo:rsid="01376bac"/>
    </style:style>
    <style:style style:name="T101" style:family="text">
      <style:text-properties officeooo:rsid="013ab6a2"/>
    </style:style>
    <style:style style:name="T102" style:family="text">
      <style:text-properties fo:font-weight="bold" officeooo:rsid="0195887c" style:font-weight-asian="bold" style:font-weight-complex="bold"/>
    </style:style>
    <style:style style:name="T103" style:family="text">
      <style:text-properties officeooo:rsid="01975dc8"/>
    </style:style>
    <style:style style:name="T104" style:family="text">
      <style:text-properties officeooo:rsid="0137c8b0"/>
    </style:style>
    <style:style style:name="T105" style:family="text">
      <style:text-properties officeooo:rsid="013d198f"/>
    </style:style>
    <style:style style:name="T106" style:family="text">
      <style:text-properties officeooo:rsid="014546c7"/>
    </style:style>
    <style:style style:name="T107" style:family="text">
      <style:text-properties fo:font-weight="bold" officeooo:rsid="013d198f" style:font-weight-asian="bold" style:font-weight-complex="bold"/>
    </style:style>
    <style:style style:name="T108" style:family="text">
      <style:text-properties officeooo:rsid="01459d9b"/>
    </style:style>
    <style:style style:name="T109" style:family="text">
      <style:text-properties officeooo:rsid="00ab3284"/>
    </style:style>
    <style:style style:name="T110" style:family="text">
      <style:text-properties officeooo:rsid="00ae1412"/>
    </style:style>
    <style:style style:name="T111" style:family="text">
      <style:text-properties fo:color="#127622" loext:opacity="100%" officeooo:rsid="002e9e8e"/>
    </style:style>
    <style:style style:name="T112" style:family="text">
      <style:text-properties fo:color="#127622" loext:opacity="100%" officeooo:rsid="01995916"/>
    </style:style>
    <style:style style:name="T113" style:family="text">
      <style:text-properties fo:background-color="#ffbf00" loext:char-shading-value="0"/>
    </style:style>
    <style:style style:name="T114" style:family="text">
      <style:text-properties officeooo:rsid="009fe2d5"/>
    </style:style>
    <style:style style:name="T115" style:family="text">
      <style:text-properties officeooo:rsid="009f79a3"/>
    </style:style>
    <style:style style:name="T116" style:family="text">
      <style:text-properties officeooo:rsid="014874b5"/>
    </style:style>
    <style:style style:name="T117" style:family="text">
      <style:text-properties officeooo:rsid="01495105"/>
    </style:style>
    <style:style style:name="T118" style:family="text">
      <style:text-properties officeooo:rsid="0064e02f"/>
    </style:style>
    <style:style style:name="T119" style:family="text">
      <style:text-properties officeooo:rsid="019b3a02"/>
    </style:style>
    <style:style style:name="T120" style:family="text">
      <style:text-properties officeooo:rsid="0077d3c7"/>
    </style:style>
    <style:style style:name="T121" style:family="text">
      <style:text-properties fo:color="#127622" loext:opacity="100%" officeooo:rsid="0064e02f"/>
    </style:style>
    <style:style style:name="T122" style:family="text">
      <style:text-properties fo:color="#127622" loext:opacity="100%" officeooo:rsid="00726aa5"/>
    </style:style>
    <style:style style:name="T123" style:family="text">
      <style:text-properties fo:color="#127622" loext:opacity="100%" officeooo:rsid="0079546e"/>
    </style:style>
    <style:style style:name="T124" style:family="text">
      <style:text-properties fo:color="#127622" loext:opacity="100%" officeooo:rsid="00663855"/>
    </style:style>
    <style:style style:name="T125" style:family="text">
      <style:text-properties officeooo:rsid="00675100"/>
    </style:style>
    <style:style style:name="T126" style:family="text">
      <style:text-properties officeooo:rsid="0073d793"/>
    </style:style>
    <style:style style:name="T127" style:family="text">
      <style:text-properties officeooo:rsid="00691eff"/>
    </style:style>
    <style:style style:name="T128" style:family="text">
      <style:text-properties officeooo:rsid="006aa55f"/>
    </style:style>
    <style:style style:name="T129" style:family="text">
      <style:text-properties officeooo:rsid="006e11ec"/>
    </style:style>
    <style:style style:name="T130" style:family="text">
      <style:text-properties officeooo:rsid="006e9f3f"/>
    </style:style>
    <style:style style:name="T131" style:family="text">
      <style:text-properties fo:color="#127622" loext:opacity="100%" officeooo:rsid="0072e600"/>
    </style:style>
    <style:style style:name="T132" style:family="text">
      <style:text-properties officeooo:rsid="0079870b"/>
    </style:style>
    <style:style style:name="T133" style:family="text">
      <style:text-properties fo:color="#127622" loext:opacity="100%" officeooo:rsid="0079870b"/>
    </style:style>
    <style:style style:name="T134" style:family="text">
      <style:text-properties officeooo:rsid="007b4c61"/>
    </style:style>
    <style:style style:name="T135" style:family="text">
      <style:text-properties officeooo:rsid="014eb0cf"/>
    </style:style>
    <style:style style:name="T136" style:family="text">
      <style:text-properties officeooo:rsid="0074de9c"/>
    </style:style>
    <style:style style:name="T137" style:family="text">
      <style:text-properties fo:color="#127622" loext:opacity="100%" officeooo:rsid="00765e92"/>
    </style:style>
    <style:style style:name="T138" style:family="text">
      <style:text-properties officeooo:rsid="00765e92"/>
    </style:style>
    <style:style style:name="T139" style:family="text">
      <style:text-properties fo:background-color="#b4c7dc" loext:char-shading-value="0"/>
    </style:style>
    <style:style style:name="T140" style:family="text">
      <style:text-properties officeooo:rsid="008c054c"/>
    </style:style>
    <style:style style:name="T141" style:family="text">
      <style:text-properties officeooo:rsid="01538528"/>
    </style:style>
    <style:style style:name="T142" style:family="text">
      <style:text-properties officeooo:rsid="009d370d"/>
    </style:style>
    <style:style style:name="T143" style:family="text">
      <style:text-properties officeooo:rsid="0154ad02"/>
    </style:style>
    <style:style style:name="T144" style:family="text">
      <style:text-properties officeooo:rsid="0163a23b"/>
    </style:style>
    <style:style style:name="T145" style:family="text">
      <style:text-properties fo:color="#127622" loext:opacity="100%" officeooo:rsid="01644e27"/>
    </style:style>
    <style:style style:name="T146" style:family="text">
      <style:text-properties fo:color="#127622" loext:opacity="100%" officeooo:rsid="015aa70a"/>
    </style:style>
    <style:style style:name="T147" style:family="text">
      <style:text-properties officeooo:rsid="015aa70a"/>
    </style:style>
    <style:style style:name="T148" style:family="text">
      <style:text-properties officeooo:rsid="015d75d3"/>
    </style:style>
    <style:style style:name="T149" style:family="text">
      <style:text-properties officeooo:rsid="01a23a49"/>
    </style:style>
    <style:style style:name="T150" style:family="text">
      <style:text-properties officeooo:rsid="0162723f"/>
    </style:style>
    <style:style style:name="T151" style:family="text">
      <style:text-properties fo:font-weight="bold" officeooo:rsid="0162723f" style:font-weight-asian="bold" style:font-weight-complex="bold"/>
    </style:style>
    <style:style style:name="T152" style:family="text">
      <style:text-properties officeooo:rsid="01671f80"/>
    </style:style>
    <style:style style:name="T153" style:family="text">
      <style:text-properties fo:background-color="transparent" loext:char-shading-value="0"/>
    </style:style>
    <style:style style:name="T154" style:family="text">
      <style:text-properties style:text-position="super 58%" fo:background-color="transparent" loext:char-shading-value="0"/>
    </style:style>
    <style:style style:name="T155" style:family="text">
      <style:text-properties officeooo:rsid="016d740c"/>
    </style:style>
    <style:style style:name="T156" style:family="text">
      <style:text-properties officeooo:rsid="016b28d9"/>
    </style:style>
    <style:style style:name="T157" style:family="text">
      <style:text-properties style:text-position="super 58%" officeooo:rsid="016b28d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nication &amp; Adultery</text:p>
      <text:p text:style-name="P2">What’s the difference and how are they related?</text:p>
      <text:p text:style-name="Standard"/>
      <text:p text:style-name="P3"><text:span text:style-name="T1">D</text:span><text:span text:style-name="T2">efinitions</text:span></text:p>
      <text:p text:style-name="Standard"/>
      <text:p text:style-name="Standard"/>
      <text:p text:style-name="P2">Betroth/espouse</text:p>
      <text:p text:style-name="P4"/>
      <table:table table:name="Table6" table:style-name="Table6">
        <table:table-column table:style-name="Table6.A"/>
        <table:table-row>
          <table:table-cell table:style-name="Table6.A1" office:value-type="string">
            <text:p text:style-name="Table_20_Contents"><text:span text:style-name="T3">Deuteronomy 22:2</text:span><text:span text:style-name="T4">3</text:span><text:line-break/>If a damsel <text:span text:style-name="T5">that is a virgin be betrothed unto </text:span><text:span text:style-name="T6">an husband</text:span>, and a man find her in the city, and lie with her;</text:p>
          </table:table-cell>
        </table:table-row>
        <table:table-row>
          <table:table-cell table:style-name="Table6.A2" office:value-type="string">
            <text:p text:style-name="P5"><text:span text:style-name="T3">Luke 1:27</text:span><text:line-break/>To <text:span text:style-name="T5">a virgin espoused to </text:span><text:span text:style-name="T6">a man</text:span> whose name was Joseph, of the house of David; and the virgin's name was Mary.</text:p>
            <text:p text:style-name="P5"/>
            <text:p text:style-name="P6"><text:span text:style-name="T3">Matthew 1:18-19</text:span><text:line-break/><text:span text:style-name="T7">18</text:span> Now the birth of Jesus Christ was on this wise: When as his mother <text:span text:style-name="T5">Mary was espoused to </text:span><text:span text:style-name="T6">Joseph</text:span>, <text:span text:style-name="T8">before they came together</text:span>, she was found with child of the Holy Ghost.<text:line-break/><text:span text:style-name="T7">19</text:span> Then Joseph <text:span text:style-name="T6">her husband</text:span>, being a just man, and not willing to make her a publick example, was minded to put her away privily.</text:p>
          </table:table-cell>
        </table:table-row>
      </table:table>
      <text:list text:style-name="L1">
        <text:list-item>
          <text:p text:style-name="P7">Both <text:span text:style-name="T9">betrothal</text:span> and <text:span text:style-name="T9">espousal</text:span> <text:span text:style-name="T10">are the </text:span><text:span text:style-name="T11">social/</text:span><text:span text:style-name="T10">legal</text:span> equivalent to marriage. <text:span text:style-name="T12">It is a custom.</text:span></text:p>
        </text:list-item>
        <text:list-item>
          <text:p text:style-name="P8"><text:span text:style-name="T13">Note that the social/legal equivalent of marriage is </text:span><text:span text:style-name="T14">not</text:span><text:span text:style-name="T13"> the same as marriage in God’s eyes.</text:span></text:p>
          <text:list>
            <text:list-item>
              <text:p text:style-name="P8"><text:span text:style-name="T15">This distinction is most clearly depicted in </text:span><text:span text:style-name="T16">two ways:</text:span></text:p>
            </text:list-item>
          </text:list>
        </text:list-item>
      </text:list>
      <text:list text:style-name="L2">
        <text:list-item>
          <text:list>
            <text:list-item>
              <text:list>
                <text:list-item>
                  <text:p text:style-name="P9">The <text:span text:style-name="T17">absence</text:span> of any command for <text:span text:style-name="T12">an espousal/betrothal period or </text:span>a ritual or ceremony for marriage.</text:p>
                </text:list-item>
                <text:list-item>
                  <text:p text:style-name="P10"><text:span text:style-name="T18">Genesis 2:</text:span><text:span text:style-name="T19">21-</text:span><text:span text:style-name="T20">24</text:span><text:span text:style-name="T21"> and</text:span><text:span text:style-name="T15"> </text:span><text:span text:style-name="T18">Matthew 19:8-9</text:span>. E<text:span text:style-name="T22">specially in how Jesus clarifies the </text:span><text:span text:style-name="T23">only</text:span><text:span text:style-name="T22"> </text:span><text:span text:style-name="T24">valid grounds for divorce </text:span><text:span text:style-name="T25">to the Jewish audience</text:span><text:span text:style-name="T22">: </text:span><text:span text:style-name="T24">it is during the espousal/betrothal period before the couple</text:span><text:span text:style-name="T22"> become “one flesh”</text:span>.</text:p>
                </text:list-item>
              </text:list>
            </text:list-item>
          </text:list>
        </text:list-item>
      </text:list>
      <text:p text:style-name="P11"/>
      <text:p text:style-name="Standard"/>
      <text:p text:style-name="P12">Adultery</text:p>
      <text:p text:style-name="Standard"/>
      <table:table table:name="Table7" table:style-name="Table7">
        <table:table-column table:style-name="Table7.A"/>
        <table:table-row>
          <table:table-cell table:style-name="Table7.A1" office:value-type="string">
            <text:p text:style-name="P13"><text:span text:style-name="T3">Leviticus 20:10</text:span> (violation of the marriage covenant)</text:p>
            <text:p text:style-name="P14"><text:span text:style-name="T3">Proverbs 6:29,32</text:span> <text:span text:style-name="T26">(violation of the marriage covenant)</text:span></text:p>
            <text:p text:style-name="P15"><text:span text:style-name="T3">Matthew 5:32</text:span>, <text:span text:style-name="T3">19:8-9</text:span> (an invalid divorce <text:span text:style-name="T27">can result</text:span> in adultery because the original couple <text:span text:style-name="T28">is</text:span> still married)</text:p>
            <text:p text:style-name="P16"><text:span text:style-name="T3">Romans 7:2-</text:span><text:span text:style-name="T29">3</text:span><text:span text:style-name="T30"> </text:span><text:span text:style-name="T26">(violation of the marriage covenant)</text:span></text:p>
            <text:p text:style-name="P17"><text:span text:style-name="T3">Hebrews 13:4</text:span> (adultery is directly tied to a consummated marriage)</text:p>
            <text:p text:style-name="P18">(many others; <text:span text:style-name="T31">none of them </text:span><text:span text:style-name="T32">definitively </text:span><text:span text:style-name="T31">describe anything </text:span><text:span text:style-name="T33">other than</text:span><text:span text:style-name="T31"> a violation of the marriage covenant</text:span>)</text:p>
          </table:table-cell>
        </table:table-row>
      </table:table>
      <text:list text:style-name="L3">
        <text:list-item>
          <text:p text:style-name="P19">Any <text:span text:style-name="T34">sexual </text:span>violation of the marriage covenant. Requires at least one party to be married <text:span text:style-name="T35">and as per </text:span><text:span text:style-name="T36">Matthew 5:32</text:span><text:span text:style-name="T35">, </text:span><text:span text:style-name="T36">19:8-9</text:span><text:span text:style-name="T35"> the marriage has been consummated.</text:span></text:p>
        </text:list-item>
        <text:list-item>
          <text:p text:style-name="P20">All adultery is a form of fornication.</text:p>
        </text:list-item>
        <text:list-item>
          <text:p text:style-name="P21">Adultery is a specific type of fornication.</text:p>
        </text:list-item>
      </text:list>
      <text:p text:style-name="Standard"/>
      <text:p text:style-name="Standard"/>
      <text:p text:style-name="P22">Fornication</text:p>
      <text:p text:style-name="Standard"/>
      <table:table table:name="Table8" table:style-name="Table8">
        <table:table-column table:style-name="Table8.A"/>
        <table:table-row>
          <table:table-cell table:style-name="Table8.A1" office:value-type="string">
            <text:p text:style-name="P23"><text:span text:style-name="T37">Genesis 38:24</text:span> (harlotry/prostitution)</text:p>
            <text:p text:style-name="P24"><text:span text:style-name="T3">Amos 7:14-17</text:span> (adultery; <text:span text:style-name="T38">Amaziah’s wife becoming a harlot is </text:span><text:span text:style-name="T39">also </text:span><text:span text:style-name="T38">adultery)</text:span></text:p>
            <text:p text:style-name="P23"><text:span text:style-name="T37">1 Corinthians 5:1</text:span><text:span text:style-name="T40"> (incest/</text:span><text:span text:style-name="T41">adultery/</text:span><text:span text:style-name="T42">unlawful sexual relationships; </text:span><text:span text:style-name="T43">Lev</text:span><text:span text:style-name="T44">iticus</text:span><text:span text:style-name="T43"> 18:8</text:span>, <text:span text:style-name="T43">20:11</text:span><text:span text:style-name="T40">)</text:span></text:p>
            <text:p text:style-name="P25"><text:span text:style-name="T3">1 Corinthians 7:2</text:span> (casual, non-committal sexual relations)</text:p>
            <text:p text:style-name="P26"><text:span text:style-name="T3">1 Cor</text:span><text:span text:style-name="T45">inthians</text:span><text:span text:style-name="T3"> 10:8</text:span> (<text:span text:style-name="T46">Numbers 25</text:span><text:span text:style-name="T47">; </text:span><text:span text:style-name="T48">unknown; </text:span><text:span text:style-name="T47">we can’t prove if the perpetrators were married or not</text:span>)</text:p>
            <text:p text:style-name="P27"><text:span text:style-name="T3">Jude 1:7</text:span> (homosexuality/<text:span text:style-name="T49">same-sex sexual relations</text:span>)</text:p>
          </table:table-cell>
        </table:table-row>
      </table:table>
      <text:list text:style-name="L4">
        <text:list-item>
          <text:p text:style-name="P28">Not all fornication is adultery <text:span text:style-name="T50">but all adultery is fornication </text:span><text:span text:style-name="T51">making fornication the broader “umbrella” term.</text:span></text:p>
        </text:list-item>
      </text:list>
      <text:p text:style-name="P29"><text:soft-page-break/><text:span text:style-name="T52">Physical fornication</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text:span text:style-name="T3">1 Corinthians 7:2</text:span><text:line-break/>Nevertheless, to avoid fornication, let every man have his own wife, and let every woman have her own husband.</text:p>
          </table:table-cell>
          <table:table-cell table:style-name="Table1.B1" office:value-type="string">
            <text:p text:style-name="P30"><text:span text:style-name="T53">Fornication is contrasted with </text:span><text:span text:style-name="T54">marriage</text:span><text:span text:style-name="T53"> </text:span><text:span text:style-name="T55">which </text:span><text:span text:style-name="T56">puts </text:span><text:span text:style-name="T57">casual</text:span><text:span text:style-name="T56"> sexual relations between unmarried couples under the umbrella of fornication</text:span></text:p>
            <text:p text:style-name="P30"><text:span text:style-name="T58">(casual sexual relationships violate the command to “</text:span><text:span text:style-name="T59">cleave to his wife</text:span><text:span text:style-name="T58">” </text:span><text:span text:style-name="T60">Genesis 2:24</text:span>, <text:span text:style-name="T60">Matthew 19:4-6</text:span><text:span text:style-name="T58">)</text:span><text:span text:style-name="T56">.</text:span></text:p>
          </table:table-cell>
        </table:table-row>
        <table:table-row table:style-name="Table1.1">
          <table:table-cell table:style-name="Table1.A2" office:value-type="string">
            <text:p text:style-name="Table_20_Contents"><text:span text:style-name="T3">Matthew 1:18-</text:span><text:span text:style-name="T61">20</text:span><text:line-break/><text:span text:style-name="T7">18</text:span> Now the birth of Jesus Christ was on this wise: When as his mother Mary <text:span text:style-name="T5">was espoused</text:span> to Joseph, <text:span text:style-name="T5">before they came together</text:span>, she was found with child of the Holy Ghost.<text:line-break/><text:span text:style-name="T7">19</text:span> Then Joseph <text:span text:style-name="T5">her husband</text:span>, being a just man, and not willing to make her a publick example, was minded to put her away privily.</text:p>
            <text:p text:style-name="Table_20_Contents"><text:span text:style-name="T7">20</text:span> But while he thought on these things, behold, the angel of the Lord appeared unto him in a dream, saying, Joseph, thou son of David, fear not to <text:span text:style-name="T5">take unto thee Mary thy wife</text:span>: for that which is conceived in her is of the Holy Ghost.</text:p>
          </table:table-cell>
          <table:table-cell table:style-name="Table1.B2" office:value-type="string">
            <text:p text:style-name="P31">Mary is called Joseph’s wife <text:span text:style-name="T62">before they became “one flesh” (came together; </text:span><text:span text:style-name="T63">Gen 2:24</text:span><text:span text:style-name="T62">)</text:span><text:span text:style-name="T64">.</text:span></text:p>
            <text:p text:style-name="P32"/>
            <text:p text:style-name="P33">This is a tough situation because Mary is pregnant <text:span text:style-name="T65">and</text:span> yet no fornication occurred <text:span text:style-name="T66">and Joseph and Mary didn’t have intercourse yet. </text:span><text:span text:style-name="T67">S</text:span><text:span text:style-name="T68">urely, Mary told Joseph what happened and how she got pregnant </text:span><text:span text:style-name="T69">because otherwise it was grounds for divorce and even death as per the Law and it would have been a great dishonor for her</text:span><text:span text:style-name="T66">.</text:span></text:p>
            <text:p text:style-name="P34"/>
            <text:p text:style-name="P35">The angel of the Lord encourages Joseph to “<text:span text:style-name="T70">take”</text:span> <text:span text:style-name="T71">her instead of divorcing her privately as he had contemplated</text:span>. <text:span text:style-name="T72">Joseph was obviously still on the fence over the issue of Mary being pregnan</text:span><text:span text:style-name="T73">t</text:span><text:span text:style-name="T72">. </text:span><text:span text:style-name="T74">If he truly didn’t believe her then as per the Law she was to be put to death.</text:span><text:span text:style-name="T72"> </text:span><text:span text:style-name="T75">The angel of the Lord appearing to him in a dream settled any remaining doubt that Joseph might have had about how to handle the situation.</text:span></text:p>
          </table:table-cell>
        </table:table-row>
        <table:table-row table:style-name="Table1.1">
          <table:table-cell table:style-name="Table1.A2" office:value-type="string">
            <text:p text:style-name="Table_20_Contents"><text:span text:style-name="T3">Deuteronomy 24:1-4</text:span><text:line-break/><text:span text:style-name="T7">1</text:span> When a man hath <text:span text:style-name="T5">taken</text:span> a wife, <text:span text:style-name="T5">and married her</text:span>, and it come to pass that she find no favour in his eyes, because he hath found some uncleanness in her: then let him write her a bill of divorcement, and give it in her hand, and send her out of his house.<text:line-break/><text:span text:style-name="T7">2</text:span> And when she is departed out of his house, she may go and be another man's wife.<text:line-break/><text:span text:style-name="T7">3</text:span> And if the latter husband hate her, and write her a bill of divorcement, and giveth it in her hand, and sendeth her out of his house; or if the latter husband die, which <text:span text:style-name="T5">took her</text:span> to be his wife;<text:line-break/><text:span text:style-name="T7">4</text:span> Her former husband, which sent her away, may not <text:span text:style-name="T5">take her</text:span> again to be his wife, <text:span text:style-name="T5">after that she is defiled</text:span>; for that is abomination before the LORD: and thou shalt not cause the land to sin, which the LORD thy God giveth thee for an inheritance.</text:p>
          </table:table-cell>
          <table:table-cell table:style-name="Table1.B2" office:value-type="string">
            <text:p text:style-name="P36">A man may divorce a woman whom he has married <text:span text:style-name="T76">and had </text:span><text:span text:style-name="T77">intercourse</text:span><text:span text:style-name="T76"> with </text:span>if he finds “<text:span text:style-name="T9">some uncleanness in her</text:span>”.</text:p>
            <text:p text:style-name="P36"/>
            <text:p text:style-name="P36">Afterwards, if <text:span text:style-name="T78">the divorced woman</text:span> marries another man <text:span text:style-name="T79">(and has had sexual relations with that man) </text:span>and <text:span text:style-name="T79">he</text:span> divorces her or dies, the first husband may not marry her <text:span text:style-name="T79">or have sexual relations with her </text:span>again because that is <text:span text:style-name="T80">an </text:span>abomination.</text:p>
            <text:p text:style-name="P36"/>
            <text:p text:style-name="P37">This <text:span text:style-name="T81">teaches</text:span> us that even among married couples, swapping husbands and wives <text:span text:style-name="T82">via divorce and remarriage </text:span>is an abomination to God.</text:p>
          </table:table-cell>
        </table:table-row>
        <text:soft-page-break/>
        <table:table-row table:style-name="Table1.1">
          <table:table-cell table:style-name="Table1.A2" office:value-type="string">
            <text:p text:style-name="Table_20_Contents"><text:span text:style-name="T3">Deuteronomy 22:23-27</text:span><text:line-break/><text:span text:style-name="T7">23</text:span> If a damsel that is a virgin be <text:span text:style-name="T5">betrothed</text:span> unto an husband, and a man find her in the city, and <text:span text:style-name="T5">lie with her</text:span>;<text:line-break/><text:span text:style-name="T7">24</text:span> Then ye shall bring them both out unto the gate of that city, and ye shall stone them with stones that they die; the damsel, because she cried not, being in the city; and the man, because he hath <text:span text:style-name="T5">humbled</text:span> his neighbour's wife: so thou shalt put away evil from among you.<text:line-break/><text:span text:style-name="T7">25</text:span> But if a man find a betrothed damsel in the field, and the man force her, and <text:span text:style-name="T5">lie with her</text:span>: then the man only that <text:span text:style-name="T5">lay</text:span> with her shall die:<text:line-break/><text:span text:style-name="T7">26</text:span> But unto the damsel thou shalt do nothing; there is in the damsel no sin worthy of death: for as when a man riseth against his neighbour, and slayeth him, even so is this matter:<text:line-break/><text:span text:style-name="T7">27</text:span> For he found her in the field, and the betrothed damsel cried, and there was none to save her.</text:p>
          </table:table-cell>
          <table:table-cell table:style-name="Table1.B2" office:value-type="string">
            <text:p text:style-name="P38"><text:span text:style-name="T83">If </text:span>a betrothed woman willfully fornicates with another man they are both <text:span text:style-name="T84">to be put to death.</text:span></text:p>
            <text:p text:style-name="P38"/>
            <text:p text:style-name="P38">If the betrothed woman was not consenting <text:span text:style-name="T85">to the fornication </text:span><text:span text:style-name="T86">(rape) </text:span>then only the man that forced her <text:span text:style-name="T87">is </text:span><text:span text:style-name="T84">to be put to death.</text:span></text:p>
          </table:table-cell>
        </table:table-row>
        <table:table-row table:style-name="Table1.1">
          <table:table-cell table:style-name="Table1.A2" office:value-type="string">
            <text:p text:style-name="Table_20_Contents"><text:span text:style-name="T3">Matthew 5:32</text:span><text:line-break/><text:span text:style-name="T88">But I say unto you, That whosoever shall put away his wife, </text:span><text:span text:style-name="T89">saving for the cause of fornication</text:span><text:span text:style-name="T88">, causeth her to commit adultery: and whosoever shall marry her that is divorced committeth adultery.</text:span></text:p>
          </table:table-cell>
          <table:table-cell table:style-name="Table1.B2" table:number-rows-spanned="2" office:value-type="string">
            <text:p text:style-name="P39"><text:span text:style-name="T90">If a couple is espoused/betrothed </text:span><text:span text:style-name="T91">they are “</text:span><text:span text:style-name="T92">legally/socially” </text:span><text:span text:style-name="T91">considered man and wife. If </text:span><text:span text:style-name="T90">one of them has intercourse with </text:span><text:span text:style-name="T93">someone else </text:span><text:span text:style-name="T91">during that espousal/betrothal period</text:span><text:span text:style-name="T90">, </text:span><text:span text:style-name="T94">God calls that</text:span><text:span text:style-name="T90"> </text:span><text:span text:style-name="T95">fornicatio</text:span><text:span text:style-name="T96">n</text:span> (not adultery).</text:p>
            <text:p text:style-name="P39"/>
            <text:p text:style-name="P39"><text:span text:style-name="T91">N</text:span><text:span text:style-name="T94">ote that Noah Websters 1828 dictionary uses these verses to define fornication as “adultery” but </text:span><text:span text:style-name="T97">these </text:span><text:span text:style-name="T98">are not</text:span><text:span text:style-name="T97"> the correct verses to use for that definition (</text:span><text:span text:style-name="T99">Amos 7:14-17</text:span> and <text:span text:style-name="T37">1 Corinthians 5:1</text:span> are appropriate). <text:span text:style-name="T100">Remember that God is talking to a Jewish audience here and the covenant of espousal/betrothal is a v</text:span><text:span text:style-name="T101">ery serious matter </text:span><text:span text:style-name="T102">to them</text:span> (it is not required <text:span text:style-name="T103">by</text:span> God)<text:span text:style-name="T100">. </text:span><text:span text:style-name="T104">Therefore, Jesus lays it out to them as clearly as possible: the only time you can divorce without sinning is if either party fornicates during the betrothal/espousal period. </text:span><text:span text:style-name="T105">After the marriage is consummated </text:span><text:span text:style-name="T106">(“one flesh”) </text:span><text:span text:style-name="T105">it is </text:span><text:span text:style-name="T107">permanent</text:span><text:span text:style-name="T105">. </text:span><text:span text:style-name="T108">The only way out after that is sin.</text:span></text:p>
            <text:p text:style-name="P40"/>
            <text:p text:style-name="P41"><text:span text:style-name="T109">Moreover, if that divorced wife then goes and marries another man, God calls that adultery (because in God’s eyes </text:span><text:span text:style-name="T110">the original couple are still married</text:span><text:span text:style-name="T109">).</text:span></text:p>
          </table:table-cell>
        </table:table-row>
        <table:table-row table:style-name="Table1.1">
          <table:table-cell table:style-name="Table1.A2" office:value-type="string">
            <text:p text:style-name="Table_20_Contents"><text:span text:style-name="T3">Matthew 19:8-9</text:span><text:line-break/><text:span text:style-name="T7">8</text:span> He saith unto them, <text:span text:style-name="T88">Moses because of the hardness of your hearts suffered you to put away your wives: but from the beginning it was not so.</text:span> (<text:span text:style-name="T3">Deu</text:span><text:span text:style-name="T111">teronomy</text:span><text:span text:style-name="T3"> 22:23-27</text:span>)<text:line-break/><text:span text:style-name="T7">9</text:span> <text:span text:style-name="T88">And I say unto you, Whosoever shall put away his wife, </text:span><text:span text:style-name="T89">except it be for fornication</text:span><text:span text:style-name="T88">, and shall marry another, committeth adultery: and whoso marrieth her which is put away doth commit adultery.</text:span></text:p>
          </table:table-cell>
          <table:covered-table-cell table:style-name="Table1.B2"/>
        </table:table-row>
        <table:table-row table:style-name="Table1.1">
          <table:table-cell table:style-name="Table1.A2" office:value-type="string">
            <text:p text:style-name="Table_20_Contents"><text:span text:style-name="T3">1 Thessalonians 4:3-</text:span><text:span text:style-name="T112">7</text:span><text:line-break/><text:span text:style-name="T7">3</text:span> For this is the will of God, even your sanctification, that ye should <text:span text:style-name="T5">abstain from fornication</text:span>:<text:line-break/><text:span text:style-name="T7">4</text:span> That every one of you should know how to possess his vessel in <text:span text:style-name="T5">sanctification and honour</text:span>;<text:line-break/><text:span text:style-name="T7">5</text:span> Not in the <text:span text:style-name="T6">lust of concupiscence</text:span>, even as the Gentiles which know not God:<text:line-break/><text:span text:style-name="T7">6</text:span> That no man go beyond and <text:span text:style-name="T6">defraud his brother</text:span> in any matter: because that <text:span text:style-name="T113">the Lord is the avenger of all such, as we also have forewarned you and testified</text:span>.<text:line-break/><text:span text:style-name="T7">7</text:span> For God hath not called us unto <text:span text:style-name="T6">uncleanness</text:span>, but unto <text:span text:style-name="T5">holiness</text:span>.</text:p>
          </table:table-cell>
          <table:table-cell table:style-name="Table1.B2" office:value-type="string">
            <text:p text:style-name="P42">Fornication is committed in the “lust of concupiscence”.</text:p>
            <text:p text:style-name="P42"/>
            <text:p text:style-name="P42">The act of fornication is the same as defrauding <text:span text:style-name="T114">a</text:span> brother <text:span text:style-name="T115">(</text:span><text:span text:style-name="T116">a women </text:span><text:span text:style-name="T117">that is </text:span><text:span text:style-name="T116">meant to be married to someone else</text:span><text:span text:style-name="T115">).</text:span></text:p>
            <text:p text:style-name="P42"/>
            <text:p text:style-name="P43">Fornication is uncleanness which is the opposite of holiness, sanctification, and honour.</text:p>
            <text:p text:style-name="P43"/>
            <text:p text:style-name="P44">The Lord will avenge any such dishonor.</text:p>
          </table:table-cell>
        </table:table-row>
      </table:table>
      <text:p text:style-name="P29"><text:soft-page-break/><text:span text:style-name="T52">Spiritual fornication</text:span></text:p>
      <text:p text:style-name="Standard"/>
      <table:table table:name="Table2" table:style-name="Table2">
        <table:table-column table:style-name="Table2.A"/>
        <table:table-row>
          <table:table-cell table:style-name="Table2.A1" office:value-type="string">
            <text:p text:style-name="Table_20_Contents"><text:span text:style-name="T3">2 Corinthians 11:2</text:span><text:line-break/>For I am jealous over you with godly jealousy: for <text:span text:style-name="T5">I have espoused you to one husband</text:span>, that I may present you as a chaste virgin to Christ.</text:p>
          </table:table-cell>
        </table:table-row>
      </table:table>
      <text:list text:style-name="L5">
        <text:list-item>
          <text:p text:style-name="P45"><text:span text:style-name="T118">Paul himself could not perform the </text:span><text:span text:style-name="T119">spiritual </text:span><text:span text:style-name="T120">marriage </text:span><text:span text:style-name="T118">operation (</text:span><text:span text:style-name="T121">Co</text:span><text:span text:style-name="T122">lossians</text:span><text:span text:style-name="T121"> 2:12</text:span>, <text:span text:style-name="T123">Revelation 3:20</text:span><text:span text:style-name="T118">) that only God can (</text:span><text:span text:style-name="T121">Eph</text:span><text:span text:style-name="T122">esians</text:span><text:span text:style-name="T121"> 2:8-</text:span><text:span text:style-name="T124">10</text:span><text:span text:style-name="T118">) </text:span><text:span text:style-name="T125">but he could “commit to spiritually marrying” (espouse) </text:span><text:span text:style-name="T126">a person to </text:span><text:span text:style-name="T127">Jesus Christ</text:span><text:span text:style-name="T125">.</text:span></text:p>
        </text:list-item>
        <text:list-item>
          <text:p text:style-name="P46"><text:span text:style-name="T128">This process is commonly called “to proselytize” </text:span><text:span text:style-name="T129">or “to evangelize” </text:span><text:span text:style-name="T130">a person.</text:span></text:p>
          <text:list>
            <text:list-item>
              <text:p text:style-name="P47">When we present Christ to a person they necessarily have to then make a decision: to accept or to reject Him.</text:p>
              <text:list>
                <text:list-item>
                  <text:p text:style-name="P48">That acceptance or rejection can never save a person (<text:span text:style-name="T3">Eph</text:span><text:span text:style-name="T131">esians</text:span><text:span text:style-name="T3"> 2:8-10</text:span>) but it can open <text:span text:style-name="T132">the door</text:span> <text:span text:style-name="T132">(</text:span><text:span text:style-name="T133">Revelation 3:20</text:span><text:span text:style-name="T132">)</text:span> <text:span text:style-name="T132">for</text:span> the Spirit of Christ <text:span text:style-name="T134">to do</text:span> His <text:span text:style-name="T135">mysterious</text:span><text:span text:style-name="T134"> </text:span>work.</text:p>
                </text:list-item>
                <text:list-item>
                  <text:p text:style-name="P48"><text:span text:style-name="T136">He will not force Himself on a person (</text:span><text:span text:style-name="T137">Matthew 23:37</text:span><text:span text:style-name="T138">, </text:span><text:span text:style-name="T137">Luke 13:34</text:span><text:span text:style-name="T136">).</text:span></text:p>
                </text:list-item>
              </text:list>
            </text:list-item>
          </text:list>
        </text:list-item>
      </text:list>
      <text:p text:style-name="P49"/>
      <text:p text:style-name="P49"/>
      <table:table table:name="Table3" table:style-name="Table3">
        <table:table-column table:style-name="Table3.A"/>
        <table:table-row>
          <table:table-cell table:style-name="Table3.A1" office:value-type="string">
            <text:p text:style-name="Table_20_Contents"><text:span text:style-name="T3">2 Chronicles 21:5-13</text:span><text:line-break/><text:span text:style-name="T7">5</text:span> <text:span text:style-name="T5">Jehoram</text:span> was thirty and two years old when he began to reign, and he reigned eight years in Jerusalem.<text:line-break/><text:span text:style-name="T7">6</text:span> And he walked in the way of the kings of Israel, like as did the house of Ahab: for he had the daughter of Ahab to wife: and he wrought that which was evil in the eyes of the LORD.<text:line-break/><text:span text:style-name="T7">7</text:span> Howbeit the LORD would not destroy the house of David, because of the covenant that he had made with David, and as he promised to give a light to him and to his sons for ever.<text:line-break/><text:span text:style-name="T7">8</text:span> In his days the Edomites revolted from under the dominion of Judah, and made themselves a king.<text:line-break/><text:span text:style-name="T7">9</text:span> Then Jehoram went forth with his princes, and all his chariots with him: and he rose up by night, and smote the Edomites which compassed him in, and the captains of the chariots.<text:line-break/><text:span text:style-name="T7">10</text:span> So the Edomites revolted from under the hand of Judah unto this day. The same time also did Libnah revolt from under his hand; because he had forsaken the LORD God of his fathers.<text:line-break/><text:span text:style-name="T7">11</text:span> Moreover he made high places in the mountains of Judah, and <text:span text:style-name="T5">caused the inhabitants of Jerusalem </text:span><text:span text:style-name="T139">to commit fornication</text:span>, <text:span text:style-name="T6">and compelled Judah</text:span> thereto.<text:line-break/><text:span text:style-name="T7">12</text:span> And there came a writing to him from Elijah the prophet, saying, Thus saith the LORD God of David thy father, Because thou hast not walked in the ways of Jehoshaphat thy father, nor in the ways of Asa king of Judah,<text:line-break/><text:span text:style-name="T7">13</text:span> But hast walked in the way of the kings of Israel, and hast made <text:span text:style-name="T6">Judah and </text:span><text:span text:style-name="T5">the inhabitants of Jerusalem </text:span><text:span text:style-name="T139">to go a whoring</text:span><text:span text:style-name="T5">, like to the whoredoms of the house of Ahab</text:span>, and also hast slain thy brethren of thy father's house, which were better than thyself:</text:p>
          </table:table-cell>
        </table:table-row>
      </table:table>
      <text:list text:style-name="L6">
        <text:list-item>
          <text:p text:style-name="P50">Here we see parallel phrase<text:span text:style-name="T140">s</text:span> that tell us that spiritual fornication is the same as spiritual “whoring/whoredom” as in <text:span text:style-name="T3">Hosea 1:2</text:span> “<text:span text:style-name="T9">departing from the LORD</text:span>”.</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Physical Adultery</text:p>
      <text:p text:style-name="Standard"/>
      <table:table table:name="Table5" table:style-name="Table5">
        <table:table-column table:style-name="Table5.A"/>
        <table:table-row>
          <table:table-cell table:style-name="Table5.A1" office:value-type="string">
            <text:p text:style-name="Table_20_Contents"><text:span text:style-name="T3">Leviticus 20:10</text:span><text:line-break/>And <text:span text:style-name="T5">the man</text:span> that committeth adultery with <text:span text:style-name="T5">another man's wife</text:span>, even he that committeth adultery with <text:span text:style-name="T5">his neighbour's wife</text:span>, the adulterer and the adulteress shall surely be put to death.</text:p>
          </table:table-cell>
        </table:table-row>
      </table:table>
      <text:list xml:id="list892819585" text:style-name="L7">
        <text:list-item>
          <text:p text:style-name="P53">Adultery is <text:span text:style-name="T141">specifically </text:span>sexual relations <text:span text:style-name="T142">that </text:span><text:span text:style-name="T143">violate the marriage covenant.</text:span></text:p>
        </text:list-item>
        <text:list-item>
          <text:p text:style-name="P54"><text:span text:style-name="T144">Since</text:span> both <text:span text:style-name="T144">are</text:span> required by the Law to be put to death then why did the scribes and the Pharisees in <text:span text:style-name="T3">John 8:3-</text:span><text:span text:style-name="T145">6</text:span> not bring the man also?</text:p>
        </text:list-item>
      </text:list>
      <text:p text:style-name="P55"/>
      <table:table table:name="Table10" table:style-name="Table10">
        <table:table-column table:style-name="Table10.A"/>
        <table:table-row>
          <table:table-cell table:style-name="Table10.A1" office:value-type="string">
            <text:p text:style-name="Table_20_Contents"><text:span text:style-name="T3">Deuteronomy 22:22</text:span> (<text:span text:style-name="T146">v23-27</text:span> <text:span text:style-name="T147">cover</text:span> betrothed <text:span text:style-name="T148">virgins</text:span>)<text:line-break/>If a man be found<text:span text:style-name="T5"> lying with a woman married</text:span> to an husband, then they shall both of them die, both the man that lay with the woman, and the woman: so shalt thou put away evil from Israel.</text:p>
          </table:table-cell>
        </table:table-row>
      </table:table>
      <text:list text:style-name="L8">
        <text:list-item>
          <text:p text:style-name="P56">God doesn’t <text:span text:style-name="T149">explicitly </text:span>name this sin but based on the rest of scripture it would be called adultery.</text:p>
        </text:list-item>
      </text:list>
      <text:p text:style-name="P55"/>
      <table:table table:name="Table9" table:style-name="Table9">
        <table:table-column table:style-name="Table9.A"/>
        <table:table-row>
          <table:table-cell table:style-name="Table9.A1" office:value-type="string">
            <text:p text:style-name="Table_20_Contents"><text:span text:style-name="T3">Proverbs 6:29-32</text:span><text:line-break/><text:span text:style-name="T7">29</text:span> So <text:span text:style-name="T5">he that goeth in to his neighbour's wife</text:span>; whosoever toucheth her shall not be innocent.<text:line-break/><text:span text:style-name="T7">30</text:span> Men do not despise a thief, if he steal to satisfy his soul when he is hungry;<text:line-break/><text:span text:style-name="T7">31</text:span> But if he be found, he shall restore sevenfold; he shall give all the substance of his house.<text:line-break/><text:span text:style-name="T7">32</text:span> But <text:span text:style-name="T5">whoso committeth adultery with a woman</text:span> lacketh understanding: he that doeth it destroyeth his own soul.</text:p>
          </table:table-cell>
        </table:table-row>
      </table:table>
      <text:list text:continue-list="list892819585" text:style-name="L7">
        <text:list-item>
          <text:p text:style-name="P57">Adultery is <text:span text:style-name="T141">specifically </text:span>sexual relations <text:span text:style-name="T142">that </text:span><text:span text:style-name="T143">violate the marriage covenant.</text:span></text:p>
        </text:list-item>
      </text:list>
      <text:p text:style-name="P58"/>
      <table:table table:name="Table11" table:style-name="Table11">
        <table:table-column table:style-name="Table11.A"/>
        <table:table-row>
          <table:table-cell table:style-name="Table11.A1" office:value-type="string">
            <text:p text:style-name="Table_20_Contents"><text:span text:style-name="T3">Romans 7:2-3</text:span><text:line-break/><text:span text:style-name="T7">2</text:span> For <text:span text:style-name="T5">the woman which hath an husband is bound by the law to her husband so long as he liveth</text:span>; but if the husband be dead, she is loosed from the law of her husband.<text:line-break/><text:span text:style-name="T7">3</text:span> So then <text:span text:style-name="T6">if, while her husband liveth, she be married to another man, she shall be called an </text:span><text:span text:style-name="T8">adulteress</text:span>: but if her husband be dead, she is free from that law; so that she is no adulteress, though she be married to another man.</text:p>
          </table:table-cell>
        </table:table-row>
      </table:table>
      <text:list text:style-name="L9">
        <text:list-item>
          <text:p text:style-name="P59">Marr<text:span text:style-name="T150">ying another man, </text:span><text:span text:style-name="T151">whether she divorced the first one or not</text:span><text:span text:style-name="T150">, is adultery.</text:span></text:p>
        </text:list-item>
      </text:list>
      <text:p text:style-name="P60"/>
      <table:table table:name="Table12" table:style-name="Table12">
        <table:table-column table:style-name="Table12.A"/>
        <table:table-row>
          <table:table-cell table:style-name="Table12.A1" office:value-type="string">
            <text:p text:style-name="Table_20_Contents"><text:span text:style-name="T3">Hebrews 13:4</text:span><text:line-break/><text:span text:style-name="T6">Marriage</text:span> is honourable in all, and the <text:span text:style-name="T6">bed</text:span> undefiled: but whoremongers and <text:span text:style-name="T5">adulterers</text:span> God will judge.</text:p>
          </table:table-cell>
        </table:table-row>
      </table:table>
      <text:list text:style-name="L10">
        <text:list-item>
          <text:p text:style-name="P61">The marriage bed implies a consummated marriage and that is contrasted with whoremongers and adulterers (those who violate the marriage covenant).</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52">Spiritual</text:span> Adultery</text:p>
      <text:p text:style-name="Standard"/>
      <table:table table:name="Table13" table:style-name="Table13">
        <table:table-column table:style-name="Table13.A"/>
        <table:table-row>
          <table:table-cell table:style-name="Table13.A1" office:value-type="string">
            <text:p text:style-name="Table_20_Contents"><text:span text:style-name="T3">Jeremiah 3:6-9</text:span><text:line-break/><text:span text:style-name="T7">6</text:span> The <text:span text:style-name="T153">LORD said also unto me in the days of Josiah the king, Hast thou seen that which backsliding Israel hath done? she is gone up upon every high mountain and under every green tree, and there hath played the harlot.<text:line-break/></text:span><text:span text:style-name="T154">7</text:span><text:span text:style-name="T153"> And I said after she had done all these things, Turn thou unto me. But she returned not. And her treacherous sister Judah saw it.<text:line-break/></text:span><text:span text:style-name="T154">8</text:span><text:span text:style-name="T153"> And I saw, when for all the causes whereby backsliding Israel committed adultery I had put her away, and given her a bill of divorce; yet her treacherous sister Judah feared not, but went and played the harlot also.<text:line-break/></text:span><text:span text:style-name="T154">9</text:span><text:span text:style-name="T153"> And it came to pass through the lightness of her whoredom, tha</text:span>t she defiled the land, and <text:span text:style-name="T5">committed adultery with stones and with stocks</text:span>.</text:p>
          </table:table-cell>
        </table:table-row>
      </table:table>
      <text:list text:style-name="L11">
        <text:list-item>
          <text:p text:style-name="P64">Judah committed <text:span text:style-name="T155">spiritual </text:span>adultery with stones and wood (idols).</text:p>
        </text:list-item>
        <text:list-item>
          <text:p text:style-name="P65">They violated the spiritual marriage covenant between God and His people.</text:p>
        </text:list-item>
      </text:list>
      <text:p text:style-name="P66"/>
      <table:table table:name="Table14" table:style-name="Table14">
        <table:table-column table:style-name="Table14.A"/>
        <table:table-row>
          <table:table-cell table:style-name="Table14.A1" office:value-type="string">
            <text:p text:style-name="P67">Ezekiel 23:<text:span text:style-name="T156">36-</text:span>37</text:p>
            <text:p text:style-name="P68"><text:span text:style-name="T7">36</text:span> The LORD said moreover unto me; Son of man, wilt thou judge Aholah and Aholibah? yea, declare unto them their abominations;<text:line-break/><text:span text:style-name="T157">37</text:span><text:span text:style-name="T156"> </text:span>That they have committed adultery, and blood is in their hands, and <text:span text:style-name="T5">with their idols have they committed adultery</text:span>, and have also caused their sons, whom they bare unto me, to pass for them through the fire, to devour them.</text:p>
          </table:table-cell>
        </table:table-row>
      </table:table>
      <text:list text:style-name="L12">
        <text:list-item>
          <text:p text:style-name="P69">The symbolic sisters Aholah (Samaria) and Aholibah (Jerusalem) <text:span text:style-name="T155">committed spiritual adultery with their idols.</text:span></text:p>
        </text:list-item>
        <text:list-item>
          <text:p text:style-name="P70">They violated the spiritual marriage covenant between God and His peopl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3T10:42:10.349211800</meta:creation-date>
    <dc:title>Fornication and Adultery</dc:title>
    <meta:editing-duration>PT7H52M33S</meta:editing-duration>
    <meta:editing-cycles>375</meta:editing-cycles>
    <meta:generator>LibreOffice/26.2.4.2$Linux_X86_64 LibreOffice_project/64a984c51f4702dbd3710b13428c673a2f1292e7</meta:generator>
    <dc:date>2026-07-11T12:20:33.639373387</dc:date>
    <meta:print-date>2026-04-23T18:36:50.398392100</meta:print-date>
    <meta:printed-by>PDF files</meta:printed-by>
    <meta:document-statistic meta:table-count="13" meta:image-count="0" meta:object-count="0" meta:page-count="6" meta:paragraph-count="85" meta:word-count="2652" meta:character-count="14851" meta:non-whitespace-character-count="12309"/>
    <meta:template xlink:type="simple" xlink:actuate="onRequest" xlink:title="default" xlink:href="../../../../AppData/Roaming/LibreOffice/4/user/template/default1.ott" meta:date="2026-04-23T10:42:10.159251100"/>
  </office:meta>
</office:document-meta>
</file>