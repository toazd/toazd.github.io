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erif SC" svg:font-family="'Source Han Serif SC'" style:font-family-generic="system" style:font-pitch="variable"/>
  </office:font-face-decls>
  <office:automatic-styles>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14" style:family="table">
      <style:table-properties style:width="7.9in" table:align="margins"/>
    </style:style>
    <style:style style:name="Table14.A" style:family="table-column">
      <style:table-column-properties style:column-width="7.9in" style:rel-column-width="65535*"/>
    </style:style>
    <style:style style:name="Table14.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3" style:family="table">
      <style:table-properties style:width="7.9in" table:align="margins"/>
    </style:style>
    <style:style style:name="Table13.A" style:family="table-column">
      <style:table-column-properties style:column-width="7.9in" style:rel-column-width="65535*"/>
    </style:style>
    <style:style style:name="Table13.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Liberation Serif" fo:font-size="14pt" fo:font-weight="bold" officeooo:rsid="00f51d6d" officeooo:paragraph-rsid="00f51d6d" style:font-size-asian="14pt" style:font-weight-asian="bold" style:font-size-complex="14pt" style:font-weight-complex="bold"/>
    </style:style>
    <style:style style:name="P2" style:family="paragraph" style:parent-style-name="Standard">
      <style:text-properties officeooo:paragraph-rsid="00248b34"/>
    </style:style>
    <style:style style:name="P3" style:family="paragraph" style:parent-style-name="Standard">
      <style:paragraph-properties fo:text-align="center" style:justify-single-word="false"/>
      <style:text-properties style:font-name="Liberation Serif" fo:font-size="14pt" fo:font-weight="normal" officeooo:rsid="00c3d3c5" officeooo:paragraph-rsid="00c3d3c5" style:font-size-asian="14pt" style:font-weight-asian="normal" style:font-size-complex="14pt" style:font-weight-complex="normal"/>
    </style:style>
    <style:style style:name="P4" style:family="paragraph" style:parent-style-name="Standard">
      <style:text-properties officeooo:paragraph-rsid="001d3809"/>
    </style:style>
    <style:style style:name="P5" style:family="paragraph" style:parent-style-name="Standard">
      <style:text-properties fo:font-weight="bold" style:font-weight-asian="bold" style:font-weight-complex="bold"/>
    </style:style>
    <style:style style:name="P6" style:family="paragraph" style:parent-style-name="Standard">
      <style:text-properties officeooo:paragraph-rsid="0050d981"/>
    </style:style>
    <style:style style:name="P7" style:family="paragraph" style:parent-style-name="Standard">
      <style:text-properties officeooo:paragraph-rsid="014011bd"/>
    </style:style>
    <style:style style:name="P8" style:family="paragraph" style:parent-style-name="Standard">
      <style:text-properties officeooo:rsid="001d3809" officeooo:paragraph-rsid="013eabe8"/>
    </style:style>
    <style:style style:name="P9" style:family="paragraph" style:parent-style-name="Standard">
      <style:text-properties officeooo:paragraph-rsid="014c1310"/>
    </style:style>
    <style:style style:name="P10" style:family="paragraph" style:parent-style-name="Standard">
      <style:text-properties officeooo:paragraph-rsid="01440474"/>
    </style:style>
    <style:style style:name="P11" style:family="paragraph" style:parent-style-name="Standard">
      <style:text-properties officeooo:rsid="014eb887" officeooo:paragraph-rsid="015736e5"/>
    </style:style>
    <style:style style:name="P12" style:family="paragraph" style:parent-style-name="Standard">
      <style:text-properties officeooo:paragraph-rsid="0149056c"/>
    </style:style>
    <style:style style:name="P13" style:family="paragraph" style:parent-style-name="Standard">
      <style:paragraph-properties fo:text-align="center" style:justify-single-word="false"/>
      <style:text-properties officeooo:paragraph-rsid="014d9292"/>
    </style:style>
    <style:style style:name="P14" style:family="paragraph" style:parent-style-name="Standard">
      <style:paragraph-properties fo:text-align="center" style:justify-single-word="false"/>
      <style:text-properties style:font-name="Liberation Serif" fo:font-size="14pt" fo:font-weight="normal" officeooo:rsid="014d9292" officeooo:paragraph-rsid="014d9292" style:font-size-asian="14pt" style:font-weight-asian="normal" style:font-size-complex="14pt" style:font-weight-complex="normal"/>
    </style:style>
    <style:style style:name="P15" style:family="paragraph" style:parent-style-name="Table_20_Contents">
      <style:text-properties fo:color="#127622" loext:opacity="100%"/>
    </style:style>
    <style:style style:name="P16" style:family="paragraph" style:parent-style-name="Table_20_Contents">
      <style:text-properties officeooo:paragraph-rsid="004df468"/>
    </style:style>
    <style:style style:name="P17" style:family="paragraph" style:parent-style-name="Standard">
      <style:text-properties officeooo:paragraph-rsid="0027835c"/>
    </style:style>
    <style:style style:name="P18" style:family="paragraph" style:parent-style-name="Standard" style:list-style-name="L1">
      <style:text-properties officeooo:paragraph-rsid="0027835c"/>
    </style:style>
    <style:style style:name="P19" style:family="paragraph" style:parent-style-name="Standard" style:list-style-name="L1">
      <style:text-properties fo:font-style="normal" officeooo:rsid="00293bc3" officeooo:paragraph-rsid="002cb797" style:font-style-asian="normal" style:font-style-complex="normal"/>
    </style:style>
    <style:style style:name="P20" style:family="paragraph" style:parent-style-name="Standard">
      <style:text-properties officeooo:rsid="003388d3" officeooo:paragraph-rsid="01605f3d"/>
    </style:style>
    <style:style style:name="P21" style:family="paragraph" style:parent-style-name="Standard" style:list-style-name="L1">
      <style:paragraph-properties style:writing-mode="lr-tb" style:writing-mode-automatic="false"/>
      <style:text-properties style:text-underline-style="none" officeooo:rsid="00356d4a" officeooo:paragraph-rsid="01605f3d"/>
    </style:style>
    <style:style style:name="P22" style:family="paragraph" style:parent-style-name="Standard" style:list-style-name="L1">
      <style:paragraph-properties style:writing-mode="lr-tb" style:writing-mode-automatic="false"/>
      <style:text-properties style:text-underline-style="none" officeooo:rsid="0160f5f4" officeooo:paragraph-rsid="0160f5f4"/>
    </style:style>
    <style:style style:name="P23" style:family="paragraph" style:parent-style-name="Standard" style:list-style-name="L1">
      <style:paragraph-properties style:writing-mode="lr-tb" style:writing-mode-automatic="false"/>
      <style:text-properties style:text-underline-style="none" officeooo:rsid="003388d3" officeooo:paragraph-rsid="01605f3d"/>
    </style:style>
    <style:style style:name="P24" style:family="paragraph" style:parent-style-name="Standard" style:list-style-name="L1">
      <style:paragraph-properties style:writing-mode="lr-tb" style:writing-mode-automatic="false"/>
      <style:text-properties style:text-underline-style="none" officeooo:rsid="01605f3d" officeooo:paragraph-rsid="01605f3d"/>
    </style:style>
    <style:style style:name="P25" style:family="paragraph" style:parent-style-name="Standard" style:list-style-name="L1">
      <style:paragraph-properties style:writing-mode="lr-tb" style:writing-mode-automatic="false"/>
      <style:text-properties style:text-underline-style="none" officeooo:rsid="01655c3e" officeooo:paragraph-rsid="01655c3e"/>
    </style:style>
    <style:style style:name="P26" style:family="paragraph" style:parent-style-name="Standard" style:list-style-name="L1">
      <style:paragraph-properties style:writing-mode="lr-tb" style:writing-mode-automatic="false"/>
      <style:text-properties style:text-underline-style="none" officeooo:rsid="01776333" officeooo:paragraph-rsid="01776333"/>
    </style:style>
    <style:style style:name="P27" style:family="paragraph" style:parent-style-name="Standard" style:list-style-name="L1">
      <style:paragraph-properties style:writing-mode="lr-tb" style:writing-mode-automatic="false"/>
      <style:text-properties style:text-underline-style="none" officeooo:rsid="0177902e" officeooo:paragraph-rsid="0177902e"/>
    </style:style>
    <style:style style:name="P28" style:family="paragraph" style:parent-style-name="Standard" style:list-style-name="L1">
      <style:paragraph-properties style:writing-mode="lr-tb" style:writing-mode-automatic="false"/>
      <style:text-properties style:text-underline-style="none" officeooo:rsid="01787cee" officeooo:paragraph-rsid="01787cee"/>
    </style:style>
    <style:style style:name="P29" style:family="paragraph" style:parent-style-name="Standard" style:list-style-name="L1">
      <style:paragraph-properties style:writing-mode="lr-tb" style:writing-mode-automatic="false"/>
      <style:text-properties style:text-underline-style="none" officeooo:rsid="017ace02" officeooo:paragraph-rsid="017ace02"/>
    </style:style>
    <style:style style:name="P30" style:family="paragraph" style:parent-style-name="Standard" style:list-style-name="L1">
      <style:paragraph-properties style:writing-mode="lr-tb" style:writing-mode-automatic="false"/>
      <style:text-properties style:text-underline-style="none" officeooo:rsid="0179660e" officeooo:paragraph-rsid="0179660e"/>
    </style:style>
    <style:style style:name="P31" style:family="paragraph" style:parent-style-name="Standard" style:list-style-name="L1">
      <style:paragraph-properties style:writing-mode="lr-tb" style:writing-mode-automatic="false"/>
      <style:text-properties style:text-underline-style="none" officeooo:rsid="017982c7" officeooo:paragraph-rsid="017982c7"/>
    </style:style>
    <style:style style:name="P32" style:family="paragraph" style:parent-style-name="Standard">
      <style:paragraph-properties fo:text-align="center" style:justify-single-word="false"/>
      <style:text-properties style:font-name="Liberation Serif" fo:font-size="14pt" fo:font-weight="normal" officeooo:rsid="0039ff2f" officeooo:paragraph-rsid="0039ff2f" style:font-size-asian="14pt" style:font-weight-asian="normal" style:font-size-complex="14pt" style:font-weight-complex="normal"/>
    </style:style>
    <style:style style:name="P33" style:family="paragraph" style:parent-style-name="Standard">
      <style:paragraph-properties fo:text-align="center" style:justify-single-word="false"/>
      <style:text-properties style:font-name="Liberation Serif" fo:font-size="14pt" fo:font-weight="normal" officeooo:rsid="017ee9bd" officeooo:paragraph-rsid="017ee9bd" style:font-size-asian="14pt" style:font-weight-asian="normal" style:font-size-complex="14pt" style:font-weight-complex="normal"/>
    </style:style>
    <style:style style:name="P34" style:family="paragraph" style:parent-style-name="Standard">
      <style:text-properties officeooo:rsid="001e578a" officeooo:paragraph-rsid="001e578a"/>
    </style:style>
    <style:style style:name="P35" style:family="paragraph" style:parent-style-name="Standard" style:list-style-name="L2">
      <style:text-properties officeooo:rsid="001e578a" officeooo:paragraph-rsid="001e578a"/>
    </style:style>
    <style:style style:name="P36" style:family="paragraph" style:parent-style-name="Standard" style:list-style-name="L2">
      <style:text-properties officeooo:rsid="0190d229" officeooo:paragraph-rsid="01916631"/>
    </style:style>
    <style:style style:name="P37" style:family="paragraph" style:parent-style-name="Standard" style:list-style-name="L2">
      <style:text-properties officeooo:rsid="01916631" officeooo:paragraph-rsid="01916631"/>
    </style:style>
    <style:style style:name="P38" style:family="paragraph" style:parent-style-name="Standard" style:list-style-name="L2">
      <style:text-properties officeooo:rsid="01932bee" officeooo:paragraph-rsid="01932bee"/>
    </style:style>
    <style:style style:name="P39" style:family="paragraph" style:parent-style-name="Standard">
      <style:text-properties officeooo:rsid="003d40da" officeooo:paragraph-rsid="003d40da"/>
    </style:style>
    <style:style style:name="P40" style:family="paragraph" style:parent-style-name="Standard">
      <style:text-properties officeooo:rsid="0188f437" officeooo:paragraph-rsid="018d9fc7"/>
    </style:style>
    <style:style style:name="P41" style:family="paragraph" style:parent-style-name="Standard">
      <style:text-properties officeooo:rsid="018a800b" officeooo:paragraph-rsid="018a800b"/>
    </style:style>
    <style:style style:name="P42" style:family="paragraph" style:parent-style-name="Standard">
      <style:paragraph-properties fo:text-align="center" style:justify-single-word="false"/>
      <style:text-properties style:font-name="Liberation Serif" fo:font-size="14pt" fo:font-weight="bold" officeooo:rsid="007b54a7" officeooo:paragraph-rsid="007b54a7" style:font-size-asian="14pt" style:font-weight-asian="bold" style:font-size-complex="14pt" style:font-weight-complex="bold"/>
    </style:style>
    <style:style style:name="P43" style:family="paragraph" style:parent-style-name="Standard">
      <style:paragraph-properties fo:text-align="center" style:justify-single-word="false"/>
      <style:text-properties style:font-name="Liberation Serif" fo:font-size="14pt" fo:font-weight="normal" officeooo:rsid="007b54a7" officeooo:paragraph-rsid="007b54a7" style:font-size-asian="14pt" style:font-weight-asian="normal" style:font-size-complex="14pt" style:font-weight-complex="normal"/>
    </style:style>
    <style:style style:name="P44" style:family="paragraph" style:parent-style-name="Standard">
      <style:paragraph-properties fo:text-align="center" style:justify-single-word="false"/>
      <style:text-properties officeooo:rsid="004383b5" officeooo:paragraph-rsid="007cba63"/>
    </style:style>
    <style:style style:name="P45" style:family="paragraph" style:parent-style-name="Standard">
      <style:text-properties officeooo:rsid="005c668d" officeooo:paragraph-rsid="007cba63"/>
    </style:style>
    <style:style style:name="P46" style:family="paragraph" style:parent-style-name="Standard">
      <style:text-properties officeooo:rsid="00608121" officeooo:paragraph-rsid="007cba63"/>
    </style:style>
    <style:style style:name="P47" style:family="paragraph" style:parent-style-name="Table_20_Contents">
      <style:text-properties fo:font-weight="bold" officeooo:paragraph-rsid="0081ab0a" style:font-weight-asian="bold" style:font-weight-complex="bold"/>
    </style:style>
    <style:style style:name="P48" style:family="paragraph" style:parent-style-name="Table_20_Contents">
      <style:text-properties officeooo:paragraph-rsid="0081ab0a"/>
    </style:style>
    <style:style style:name="P49" style:family="paragraph" style:parent-style-name="Table_20_Contents">
      <style:text-properties officeooo:paragraph-rsid="007cba63"/>
    </style:style>
    <style:style style:name="P50" style:family="paragraph" style:parent-style-name="Table_20_Contents" style:list-style-name="L3">
      <style:text-properties officeooo:paragraph-rsid="007cba63"/>
    </style:style>
    <style:style style:name="P51" style:family="paragraph" style:parent-style-name="Table_20_Contents" style:list-style-name="L3">
      <style:text-properties officeooo:rsid="00608121" officeooo:paragraph-rsid="007cba63"/>
    </style:style>
    <style:style style:name="P52" style:family="paragraph" style:parent-style-name="Table_20_Contents">
      <style:text-properties officeooo:rsid="00608121" officeooo:paragraph-rsid="007cba63"/>
    </style:style>
    <style:style style:name="P53" style:family="paragraph" style:parent-style-name="Standard" style:list-style-name="L3">
      <style:text-properties officeooo:rsid="00ccf1de" officeooo:paragraph-rsid="00ccf1de"/>
    </style:style>
    <style:style style:name="P54" style:family="paragraph" style:parent-style-name="Standard">
      <style:paragraph-properties fo:text-align="center" style:justify-single-word="false"/>
      <style:text-properties style:font-name="Liberation Serif" fo:font-size="14pt" fo:font-weight="normal" officeooo:rsid="00891328" officeooo:paragraph-rsid="00891328" style:font-size-asian="14pt" style:font-weight-asian="normal" style:font-size-complex="14pt" style:font-weight-complex="normal"/>
    </style:style>
    <style:style style:name="P55" style:family="paragraph" style:parent-style-name="Table_20_Contents">
      <style:text-properties fo:color="#127622" loext:opacity="100%" officeooo:paragraph-rsid="007cba63"/>
    </style:style>
    <style:style style:name="P56" style:family="paragraph" style:parent-style-name="Standard" style:list-style-name="L4">
      <style:text-properties officeooo:rsid="00664bff" officeooo:paragraph-rsid="00843e2b"/>
    </style:style>
    <style:style style:name="P57" style:family="paragraph" style:parent-style-name="Standard" style:list-style-name="L4">
      <style:text-properties officeooo:rsid="00683a28" officeooo:paragraph-rsid="00fcfc34"/>
    </style:style>
    <style:style style:name="P58" style:family="paragraph" style:parent-style-name="Standard" style:list-style-name="L4">
      <style:text-properties officeooo:rsid="00664bff" officeooo:paragraph-rsid="007cba63"/>
    </style:style>
    <style:style style:name="P59" style:family="paragraph" style:parent-style-name="Standard">
      <style:text-properties officeooo:rsid="007d4654" officeooo:paragraph-rsid="007d4654"/>
    </style:style>
    <style:style style:name="P60" style:family="paragraph" style:parent-style-name="Standard">
      <style:paragraph-properties fo:text-align="center" style:justify-single-word="false"/>
      <style:text-properties style:font-name="Liberation Serif" fo:font-size="14pt" fo:font-weight="normal" officeooo:rsid="008ad7b2" officeooo:paragraph-rsid="008ad7b2" style:font-size-asian="14pt" style:font-weight-asian="normal" style:font-size-complex="14pt" style:font-weight-complex="normal"/>
    </style:style>
    <style:style style:name="P61" style:family="paragraph" style:parent-style-name="Standard" style:list-style-name="L5">
      <style:text-properties officeooo:paragraph-rsid="004209e4"/>
    </style:style>
    <style:style style:name="P62" style:family="paragraph" style:parent-style-name="Standard" style:list-style-name="L5">
      <style:text-properties officeooo:rsid="0059bdf7" officeooo:paragraph-rsid="0059bdf7"/>
    </style:style>
    <style:style style:name="P63" style:family="paragraph" style:parent-style-name="Standard" style:list-style-name="L5">
      <style:text-properties officeooo:rsid="004383b5" officeooo:paragraph-rsid="004383b5"/>
    </style:style>
    <style:style style:name="P64" style:family="paragraph" style:parent-style-name="Standard">
      <style:text-properties officeooo:rsid="004383b5" officeooo:paragraph-rsid="004383b5"/>
    </style:style>
    <style:style style:name="P65" style:family="paragraph" style:parent-style-name="Standard">
      <style:text-properties officeooo:rsid="0091472d" officeooo:paragraph-rsid="0091472d"/>
    </style:style>
    <style:style style:name="P66" style:family="paragraph" style:parent-style-name="Standard" style:list-style-name="L6">
      <style:text-properties officeooo:rsid="0077b771" officeooo:paragraph-rsid="0077b771"/>
    </style:style>
    <style:style style:name="P67" style:family="paragraph" style:parent-style-name="Standard" style:list-style-name="L6">
      <style:text-properties officeooo:rsid="00d35517" officeooo:paragraph-rsid="00d35517"/>
    </style:style>
    <style:style style:name="P68" style:family="paragraph" style:parent-style-name="Standard" style:list-style-name="L6">
      <style:text-properties officeooo:rsid="01016188" officeooo:paragraph-rsid="01016188"/>
    </style:style>
    <style:style style:name="P69" style:family="paragraph" style:parent-style-name="Standard" style:list-style-name="L7">
      <style:text-properties officeooo:paragraph-rsid="0091472d"/>
    </style:style>
    <style:style style:name="P70" style:family="paragraph" style:parent-style-name="Standard" style:list-style-name="L7">
      <style:text-properties officeooo:rsid="00d74b97" officeooo:paragraph-rsid="00d74b97"/>
    </style:style>
    <style:style style:name="P71" style:family="paragraph" style:parent-style-name="Standard">
      <style:paragraph-properties fo:text-align="center" style:justify-single-word="false"/>
      <style:text-properties fo:font-weight="normal" officeooo:rsid="0095e02d" officeooo:paragraph-rsid="0095e02d" style:font-weight-asian="normal" style:font-weight-complex="normal"/>
    </style:style>
    <style:style style:name="P72" style:family="paragraph" style:parent-style-name="Standard">
      <style:text-properties officeooo:rsid="0095e02d" officeooo:paragraph-rsid="0095e02d"/>
    </style:style>
    <style:style style:name="P73" style:family="paragraph" style:parent-style-name="Standard" style:list-style-name="L8">
      <style:text-properties officeooo:rsid="00932703" officeooo:paragraph-rsid="009b045b"/>
    </style:style>
    <style:style style:name="P74" style:family="paragraph" style:parent-style-name="Standard" style:list-style-name="L8">
      <style:text-properties officeooo:rsid="00af8a50" officeooo:paragraph-rsid="00af8a50"/>
    </style:style>
    <style:style style:name="P75" style:family="paragraph" style:parent-style-name="Standard" style:list-style-name="L8">
      <style:text-properties officeooo:rsid="00d84df9" officeooo:paragraph-rsid="00d84df9"/>
    </style:style>
    <style:style style:name="P76" style:family="paragraph" style:parent-style-name="Standard" style:list-style-name="L8">
      <style:text-properties officeooo:rsid="00d98ee5" officeooo:paragraph-rsid="00d98ee5"/>
    </style:style>
    <style:style style:name="P77" style:family="paragraph" style:parent-style-name="Standard" style:list-style-name="L8">
      <style:text-properties officeooo:rsid="010dedc8" officeooo:paragraph-rsid="010dedc8"/>
    </style:style>
    <style:style style:name="P78" style:family="paragraph" style:parent-style-name="Standard">
      <style:text-properties officeooo:rsid="003d40da" officeooo:paragraph-rsid="004383b5"/>
    </style:style>
    <style:style style:name="P79" style:family="paragraph" style:parent-style-name="Standard" style:list-style-name="L9">
      <style:text-properties officeooo:rsid="009deb3b" officeooo:paragraph-rsid="009deb3b"/>
    </style:style>
    <style:style style:name="P80" style:family="paragraph" style:parent-style-name="Standard" style:list-style-name="L9">
      <style:text-properties officeooo:rsid="00a0046d" officeooo:paragraph-rsid="00a21fe7"/>
    </style:style>
    <style:style style:name="P81" style:family="paragraph" style:parent-style-name="Standard" style:list-style-name="L9">
      <style:text-properties officeooo:rsid="010ffc26" officeooo:paragraph-rsid="010ffc26"/>
    </style:style>
    <style:style style:name="P82" style:family="paragraph" style:parent-style-name="Standard" style:list-style-name="L9">
      <style:text-properties officeooo:rsid="00a0bc31" officeooo:paragraph-rsid="00a21fe7"/>
    </style:style>
    <style:style style:name="P83" style:family="paragraph" style:parent-style-name="Standard">
      <style:text-properties officeooo:rsid="00a0046d" officeooo:paragraph-rsid="00a0046d"/>
    </style:style>
    <style:style style:name="P84" style:family="paragraph" style:parent-style-name="Standard">
      <style:text-properties officeooo:rsid="00a3eb4d" officeooo:paragraph-rsid="00a3eb4d"/>
    </style:style>
    <style:style style:name="P85" style:family="paragraph" style:parent-style-name="Standard">
      <style:text-properties officeooo:rsid="00a3eb4d" officeooo:paragraph-rsid="00a5defc"/>
    </style:style>
    <style:style style:name="P86" style:family="paragraph" style:parent-style-name="Standard">
      <style:text-properties officeooo:rsid="003d40da" officeooo:paragraph-rsid="00a5defc"/>
    </style:style>
    <style:style style:name="P87" style:family="paragraph" style:parent-style-name="Standard" style:list-style-name="L10">
      <style:text-properties officeooo:rsid="003d40da" officeooo:paragraph-rsid="00a5defc"/>
    </style:style>
    <style:style style:name="P88" style:family="paragraph" style:parent-style-name="Standard">
      <style:text-properties officeooo:paragraph-rsid="00a6bdb8"/>
    </style:style>
    <style:style style:name="P89" style:family="paragraph" style:parent-style-name="Standard">
      <style:text-properties officeooo:rsid="00a95d56" officeooo:paragraph-rsid="00a95d56"/>
    </style:style>
    <style:style style:name="P90" style:family="paragraph" style:parent-style-name="Standard">
      <style:paragraph-properties fo:text-align="center" style:justify-single-word="false"/>
      <style:text-properties style:font-name="Liberation Serif" fo:font-size="14pt" officeooo:rsid="0123dedc" officeooo:paragraph-rsid="0123dedc" style:font-size-asian="14pt" style:font-size-complex="14pt"/>
    </style:style>
    <style:style style:name="P91" style:family="paragraph" style:parent-style-name="Standard" style:list-style-name="L11">
      <style:text-properties officeooo:rsid="00b6e2f7" officeooo:paragraph-rsid="00b6e2f7"/>
    </style:style>
    <style:style style:name="P92" style:family="paragraph" style:parent-style-name="Standard">
      <style:text-properties officeooo:paragraph-rsid="00b49b9e"/>
    </style:style>
    <style:style style:name="P93" style:family="paragraph" style:parent-style-name="Standard">
      <style:paragraph-properties fo:text-align="center" style:justify-single-word="false"/>
      <style:text-properties officeooo:paragraph-rsid="00ea6636"/>
    </style:style>
    <style:style style:name="P94" style:family="paragraph" style:parent-style-name="Standard">
      <style:text-properties style:font-name="Liberation Sans" fo:font-size="12pt" style:font-size-asian="12pt" style:font-size-complex="12pt"/>
    </style:style>
    <style:style style:name="P95" style:family="paragraph" style:parent-style-name="Heading_20_2">
      <style:paragraph-properties fo:line-height="100%"/>
      <style:text-properties style:font-name="Liberation Sans" fo:font-size="12pt" style:font-size-asian="12pt" style:font-size-complex="12pt"/>
    </style:style>
    <style:style style:name="P96" style:family="paragraph" style:parent-style-name="Text_20_body">
      <style:paragraph-properties fo:margin-left="0in" fo:margin-right="0in" fo:margin-top="0in" fo:margin-bottom="0.0972in" style:contextual-spacing="false" fo:line-height="100%" fo:text-indent="0in" style:auto-text-indent="false"/>
      <style:text-properties style:font-name="Liberation Sans" fo:font-size="12pt" style:font-size-asian="12pt" style:font-size-complex="12pt"/>
    </style:style>
    <style:style style:name="P97" style:family="paragraph" style:parent-style-name="Text_20_body" style:list-style-name="L12">
      <style:paragraph-properties fo:margin-left="0in" fo:margin-right="0in" fo:margin-top="0in" fo:margin-bottom="0.0972in" style:contextual-spacing="false" fo:line-height="100%" fo:text-indent="0in" style:auto-text-indent="false" fo:padding="0in" fo:border="none"/>
      <style:text-properties style:font-name="Liberation Sans" fo:font-size="12pt" style:font-size-asian="12pt" style:font-size-complex="12pt"/>
    </style:style>
    <style:style style:name="P98" style:family="paragraph" style:parent-style-name="Heading_20_2">
      <style:paragraph-properties fo:margin-left="0in" fo:margin-right="0in" fo:margin-top="0in" fo:margin-bottom="0.0972in" style:contextual-spacing="false" fo:line-height="100%" fo:text-indent="0in" style:auto-text-indent="false"/>
      <style:text-properties style:font-name="Liberation Sans" fo:font-size="12pt" style:font-size-asian="12pt" style:font-size-complex="12pt"/>
    </style:style>
    <style:style style:name="P99" style:family="paragraph" style:parent-style-name="Text_20_body" style:list-style-name="L13">
      <style:paragraph-properties fo:margin-left="0in" fo:margin-right="0in" fo:margin-top="0in" fo:margin-bottom="0.0972in" style:contextual-spacing="false" fo:line-height="100%" fo:text-indent="0in" style:auto-text-indent="false" fo:padding="0in" fo:border="none"/>
      <style:text-properties style:font-name="Liberation Sans" fo:font-size="12pt" style:font-size-asian="12pt" style:font-size-complex="12pt"/>
    </style:style>
    <style:style style:name="P100" style:family="paragraph" style:parent-style-name="Standard">
      <style:text-properties style:font-name="Liberation Sans"/>
    </style:style>
    <style:style style:name="P101" style:family="paragraph" style:parent-style-name="Quotations">
      <style:paragraph-properties fo:margin-left="0in" fo:margin-right="0.3937in" fo:margin-top="0in" fo:margin-bottom="0.1965in" style:contextual-spacing="false" fo:line-height="100%" fo:text-indent="0in" style:auto-text-indent="false"/>
      <style:text-properties style:font-name="Liberation Sans" fo:font-size="12pt" style:font-size-asian="12pt" style:font-size-complex="12pt"/>
    </style:style>
    <style:style style:name="P102" style:family="paragraph" style:parent-style-name="Quotations">
      <style:paragraph-properties fo:margin-left="0in" fo:margin-right="0.3937in" fo:margin-top="0in" fo:margin-bottom="0.1965in" style:contextual-spacing="false" fo:line-height="100%" fo:text-indent="0in" style:auto-text-indent="false"/>
      <style:text-properties officeooo:paragraph-rsid="012e3240"/>
    </style:style>
    <style:style style:name="P103" style:family="paragraph" style:parent-style-name="Quotations">
      <style:paragraph-properties fo:margin-left="0in" fo:margin-right="0.3937in" fo:margin-top="0in" fo:margin-bottom="0.1965in" style:contextual-spacing="false" fo:line-height="100%" fo:text-indent="0in" style:auto-text-indent="false"/>
      <style:text-properties style:font-name="Liberation Sans" fo:font-size="12pt" officeooo:rsid="012e3240" officeooo:paragraph-rsid="012e3240" style:font-size-asian="12pt" style:font-size-complex="12pt"/>
    </style:style>
    <style:style style:name="P104" style:family="paragraph" style:parent-style-name="Table_20_Contents">
      <style:text-properties fo:color="#127622" loext:opacity="100%" fo:font-size="12pt" style:font-size-asian="12pt" style:font-size-complex="12pt"/>
    </style:style>
    <style:style style:name="P105" style:family="paragraph" style:parent-style-name="Table_20_Contents">
      <style:text-properties fo:font-size="12pt" style:font-size-asian="12pt" style:font-size-complex="12pt"/>
    </style:style>
    <style:style style:name="T1" style:family="text">
      <style:text-properties officeooo:rsid="01198a03"/>
    </style:style>
    <style:style style:name="T2" style:family="text">
      <style:text-properties officeooo:rsid="01394f56"/>
    </style:style>
    <style:style style:name="T3" style:family="text">
      <style:text-properties officeooo:rsid="00212a90"/>
    </style:style>
    <style:style style:name="T4" style:family="text">
      <style:text-properties officeooo:rsid="0131cf06"/>
    </style:style>
    <style:style style:name="T5" style:family="text">
      <style:text-properties officeooo:rsid="00c34edc"/>
    </style:style>
    <style:style style:name="T6" style:family="text">
      <style:text-properties style:text-position="super 58%" officeooo:rsid="00c34edc"/>
    </style:style>
    <style:style style:name="T7" style:family="text">
      <style:text-properties officeooo:rsid="014eb887"/>
    </style:style>
    <style:style style:name="T8" style:family="text">
      <style:text-properties officeooo:rsid="0137e911"/>
    </style:style>
    <style:style style:name="T9" style:family="text">
      <style:text-properties officeooo:rsid="013a6b63"/>
    </style:style>
    <style:style style:name="T10" style:family="text">
      <style:text-properties officeooo:rsid="013ab147"/>
    </style:style>
    <style:style style:name="T11" style:family="text">
      <style:text-properties fo:font-weight="bold" style:font-weight-asian="bold" style:font-weight-complex="bold"/>
    </style:style>
    <style:style style:name="T12" style:family="text">
      <style:text-properties officeooo:rsid="00502950"/>
    </style:style>
    <style:style style:name="T13" style:family="text">
      <style:text-properties fo:color="#127622" loext:opacity="100%" officeooo:rsid="00502950"/>
    </style:style>
    <style:style style:name="T14" style:family="text">
      <style:text-properties officeooo:rsid="004f3706"/>
    </style:style>
    <style:style style:name="T15" style:family="text">
      <style:text-properties fo:color="#127622" loext:opacity="100%" officeooo:rsid="004f3706"/>
    </style:style>
    <style:style style:name="T16" style:family="text">
      <style:text-properties officeooo:rsid="001d3809"/>
    </style:style>
    <style:style style:name="T17" style:family="text">
      <style:text-properties officeooo:rsid="014ec6d3"/>
    </style:style>
    <style:style style:name="T18" style:family="text">
      <style:text-properties fo:color="#127622" loext:opacity="100%" officeooo:rsid="014ec6d3"/>
    </style:style>
    <style:style style:name="T19" style:family="text">
      <style:text-properties officeooo:rsid="01507212"/>
    </style:style>
    <style:style style:name="T20" style:family="text">
      <style:text-properties fo:color="#127622" loext:opacity="100%" officeooo:rsid="01507212"/>
    </style:style>
    <style:style style:name="T21" style:family="text">
      <style:text-properties officeooo:rsid="01440474"/>
    </style:style>
    <style:style style:name="T22" style:family="text">
      <style:text-properties officeooo:rsid="003217d3"/>
    </style:style>
    <style:style style:name="T23" style:family="text">
      <style:text-properties officeooo:rsid="00c80bea"/>
    </style:style>
    <style:style style:name="T24" style:family="text">
      <style:text-properties officeooo:rsid="014a52e2"/>
    </style:style>
    <style:style style:name="T25" style:family="text">
      <style:text-properties officeooo:rsid="015736e5"/>
    </style:style>
    <style:style style:name="T26" style:family="text">
      <style:text-properties officeooo:rsid="015b2527"/>
    </style:style>
    <style:style style:name="T27" style:family="text">
      <style:text-properties officeooo:rsid="01563fea"/>
    </style:style>
    <style:style style:name="T28" style:family="text">
      <style:text-properties officeooo:rsid="015355f0"/>
    </style:style>
    <style:style style:name="T29" style:family="text">
      <style:text-properties style:font-name="Liberation Serif" fo:font-size="14pt" fo:font-weight="normal" officeooo:rsid="0039ff2f" style:font-size-asian="14pt" style:font-weight-asian="normal" style:font-size-complex="14pt" style:font-weight-complex="normal"/>
    </style:style>
    <style:style style:name="T30" style:family="text">
      <style:text-properties style:font-name="Liberation Serif" fo:font-size="14pt" fo:font-weight="normal" officeooo:rsid="014d9292" style:font-size-asian="14pt" style:font-weight-asian="normal" style:font-size-complex="14pt" style:font-weight-complex="normal"/>
    </style:style>
    <style:style style:name="T31" style:family="text">
      <style:text-properties officeooo:rsid="014daa6c"/>
    </style:style>
    <style:style style:name="T32" style:family="text">
      <style:text-properties fo:background-color="#ffff00" loext:char-shading-value="0"/>
    </style:style>
    <style:style style:name="T33" style:family="text">
      <style:text-properties style:text-position="super 58%"/>
    </style:style>
    <style:style style:name="T34" style:family="text">
      <style:text-properties fo:background-color="#ffff00" loext:char-shading-value="0"/>
    </style:style>
    <style:style style:name="T35" style:family="text">
      <style:text-properties fo:background-color="#fff5ce" loext:char-shading-value="0"/>
    </style:style>
    <style:style style:name="T36" style:family="text">
      <style:text-properties officeooo:rsid="001e2011"/>
    </style:style>
    <style:style style:name="T37" style:family="text">
      <style:text-properties officeooo:rsid="01598774"/>
    </style:style>
    <style:style style:name="T38" style:family="text">
      <style:text-properties fo:font-style="normal" officeooo:rsid="0027835c" style:font-style-asian="normal" style:font-style-complex="normal"/>
    </style:style>
    <style:style style:name="T39" style:family="text">
      <style:text-properties fo:font-style="normal" fo:font-weight="bold" officeooo:rsid="0027835c" style:font-style-asian="normal" style:font-weight-asian="bold" style:font-style-complex="normal" style:font-weight-complex="bold"/>
    </style:style>
    <style:style style:name="T40" style:family="text">
      <style:text-properties officeooo:rsid="016a140b"/>
    </style:style>
    <style:style style:name="T41" style:family="text">
      <style:text-properties officeooo:rsid="0053b6bf"/>
    </style:style>
    <style:style style:name="T42" style:family="text">
      <style:text-properties fo:font-style="italic" style:font-style-asian="italic" style:font-style-complex="italic"/>
    </style:style>
    <style:style style:name="T43" style:family="text">
      <style:text-properties officeooo:rsid="00356d4a"/>
    </style:style>
    <style:style style:name="T44" style:family="text">
      <style:text-properties officeooo:rsid="01787cee"/>
    </style:style>
    <style:style style:name="T45" style:family="text">
      <style:text-properties officeooo:rsid="01848c3a"/>
    </style:style>
    <style:style style:name="T46" style:family="text">
      <style:text-properties officeooo:rsid="017346b0"/>
    </style:style>
    <style:style style:name="T47" style:family="text">
      <style:text-properties officeooo:rsid="01614f11"/>
    </style:style>
    <style:style style:name="T48" style:family="text">
      <style:text-properties fo:color="#127622" loext:opacity="100%" officeooo:rsid="00356d4a"/>
    </style:style>
    <style:style style:name="T49" style:family="text">
      <style:text-properties officeooo:rsid="0162047b"/>
    </style:style>
    <style:style style:name="T50" style:family="text">
      <style:text-properties fo:color="#127622" loext:opacity="100%" officeooo:rsid="0162047b"/>
    </style:style>
    <style:style style:name="T51" style:family="text">
      <style:text-properties officeooo:rsid="017472c8"/>
    </style:style>
    <style:style style:name="T52" style:family="text">
      <style:text-properties fo:color="#127622" loext:opacity="100%"/>
    </style:style>
    <style:style style:name="T53" style:family="text">
      <style:text-properties officeooo:rsid="016c049f"/>
    </style:style>
    <style:style style:name="T54" style:family="text">
      <style:text-properties officeooo:rsid="0167ee66"/>
    </style:style>
    <style:style style:name="T55" style:family="text">
      <style:text-properties officeooo:rsid="016e9ff2"/>
    </style:style>
    <style:style style:name="T56" style:family="text">
      <style:text-properties officeooo:rsid="01661458"/>
    </style:style>
    <style:style style:name="T57" style:family="text">
      <style:text-properties fo:color="#127622" loext:opacity="100%" officeooo:rsid="01661458"/>
    </style:style>
    <style:style style:name="T58" style:family="text">
      <style:text-properties officeooo:rsid="0177902e"/>
    </style:style>
    <style:style style:name="T59" style:family="text">
      <style:text-properties fo:color="#127622" loext:opacity="100%" officeooo:rsid="0177902e"/>
    </style:style>
    <style:style style:name="T60" style:family="text">
      <style:text-properties officeooo:rsid="01809c61"/>
    </style:style>
    <style:style style:name="T61" style:family="text">
      <style:text-properties officeooo:rsid="003ba5c6"/>
    </style:style>
    <style:style style:name="T62" style:family="text">
      <style:text-properties fo:color="#127622" loext:opacity="100%" officeooo:rsid="003ba5c6" fo:background-color="transparent" loext:char-shading-value="0"/>
    </style:style>
    <style:style style:name="T63" style:family="text">
      <style:text-properties officeooo:rsid="003bfa5b"/>
    </style:style>
    <style:style style:name="T64" style:family="text">
      <style:text-properties officeooo:rsid="0039ff2f"/>
    </style:style>
    <style:style style:name="T65" style:family="text">
      <style:text-properties fo:font-weight="bold" officeooo:rsid="0039ff2f" style:font-weight-asian="bold" style:font-weight-complex="bold"/>
    </style:style>
    <style:style style:name="T66" style:family="text">
      <style:text-properties fo:font-weight="bold" officeooo:rsid="018115f7" style:font-weight-asian="bold" style:font-weight-complex="bold"/>
    </style:style>
    <style:style style:name="T67" style:family="text">
      <style:text-properties officeooo:rsid="018115f7"/>
    </style:style>
    <style:style style:name="T68" style:family="text">
      <style:text-properties officeooo:rsid="001e578a"/>
    </style:style>
    <style:style style:name="T69" style:family="text">
      <style:text-properties fo:color="#127622" loext:opacity="100%" officeooo:rsid="001e578a"/>
    </style:style>
    <style:style style:name="T70" style:family="text">
      <style:text-properties officeooo:rsid="0194f869"/>
    </style:style>
    <style:style style:name="T71" style:family="text">
      <style:text-properties officeooo:rsid="019556be"/>
    </style:style>
    <style:style style:name="T72" style:family="text">
      <style:text-properties officeooo:rsid="019828b2"/>
    </style:style>
    <style:style style:name="T73" style:family="text">
      <style:text-properties officeooo:rsid="0187996b"/>
    </style:style>
    <style:style style:name="T74" style:family="text">
      <style:text-properties officeooo:rsid="018963a3"/>
    </style:style>
    <style:style style:name="T75" style:family="text">
      <style:text-properties officeooo:rsid="019798ff"/>
    </style:style>
    <style:style style:name="T76" style:family="text">
      <style:text-properties fo:font-weight="bold" officeooo:rsid="019798ff" style:font-weight-asian="bold" style:font-weight-complex="bold"/>
    </style:style>
    <style:style style:name="T77" style:family="text">
      <style:text-properties officeooo:rsid="0196c35f"/>
    </style:style>
    <style:style style:name="T78" style:family="text">
      <style:text-properties officeooo:rsid="0196e5f4"/>
    </style:style>
    <style:style style:name="T79" style:family="text">
      <style:text-properties officeooo:rsid="0197a8bf"/>
    </style:style>
    <style:style style:name="T80" style:family="text">
      <style:text-properties officeooo:rsid="018a800b"/>
    </style:style>
    <style:style style:name="T81" style:family="text">
      <style:text-properties officeooo:rsid="018c030c"/>
    </style:style>
    <style:style style:name="T82" style:family="text">
      <style:text-properties fo:font-weight="bold" fo:background-color="#ffff00" loext:char-shading-value="0" style:font-weight-asian="bold" style:font-weight-complex="bold"/>
    </style:style>
    <style:style style:name="T83" style:family="text">
      <style:text-properties officeooo:rsid="007cba63"/>
    </style:style>
    <style:style style:name="T84" style:family="text">
      <style:text-properties officeooo:rsid="00878346"/>
    </style:style>
    <style:style style:name="T85" style:family="text">
      <style:text-properties officeooo:rsid="00600681"/>
    </style:style>
    <style:style style:name="T86" style:family="text">
      <style:text-properties officeooo:rsid="00608121"/>
    </style:style>
    <style:style style:name="T87" style:family="text">
      <style:text-properties officeooo:rsid="007fb214"/>
    </style:style>
    <style:style style:name="T88" style:family="text">
      <style:text-properties officeooo:rsid="00fc7008"/>
    </style:style>
    <style:style style:name="T89" style:family="text">
      <style:text-properties officeooo:rsid="00cd1956"/>
    </style:style>
    <style:style style:name="T90" style:family="text">
      <style:text-properties officeooo:rsid="00843e2b"/>
    </style:style>
    <style:style style:name="T91" style:family="text">
      <style:text-properties officeooo:rsid="0089aa99"/>
    </style:style>
    <style:style style:name="T92" style:family="text">
      <style:text-properties fo:font-style="italic" officeooo:rsid="0089aa99" style:font-style-asian="italic" style:font-style-complex="italic"/>
    </style:style>
    <style:style style:name="T93" style:family="text">
      <style:text-properties officeooo:rsid="008530f4"/>
    </style:style>
    <style:style style:name="T94" style:family="text">
      <style:text-properties officeooo:rsid="006a12ce"/>
    </style:style>
    <style:style style:name="T95" style:family="text">
      <style:text-properties officeooo:rsid="00ceac6d"/>
    </style:style>
    <style:style style:name="T96" style:family="text">
      <style:text-properties officeooo:rsid="007613c0"/>
    </style:style>
    <style:style style:name="T97" style:family="text">
      <style:text-properties officeooo:rsid="00683a28"/>
    </style:style>
    <style:style style:name="T98" style:family="text">
      <style:text-properties officeooo:rsid="00d00399"/>
    </style:style>
    <style:style style:name="T99" style:family="text">
      <style:text-properties fo:font-weight="bold" officeooo:rsid="00d2003d" style:font-weight-asian="bold" style:font-weight-complex="bold"/>
    </style:style>
    <style:style style:name="T100" style:family="text">
      <style:text-properties officeooo:rsid="00d2003d"/>
    </style:style>
    <style:style style:name="T101" style:family="text">
      <style:text-properties fo:color="#ff0000" loext:opacity="100%"/>
    </style:style>
    <style:style style:name="T102" style:family="text">
      <style:text-properties fo:color="#ff0000" loext:opacity="100%" fo:background-color="#b4c7dc" loext:char-shading-value="0"/>
    </style:style>
    <style:style style:name="T103" style:family="text">
      <style:text-properties fo:color="#ff0000" loext:opacity="100%" fo:background-color="#ffff00" loext:char-shading-value="0"/>
    </style:style>
    <style:style style:name="T104" style:family="text">
      <style:text-properties fo:color="#ff0000" loext:opacity="100%" fo:background-color="#fff5ce" loext:char-shading-value="0"/>
    </style:style>
    <style:style style:name="T105" style:family="text">
      <style:text-properties officeooo:rsid="004209e4"/>
    </style:style>
    <style:style style:name="T106" style:family="text">
      <style:text-properties fo:font-style="italic" officeooo:rsid="004209e4" style:font-style-asian="italic" style:font-style-complex="italic"/>
    </style:style>
    <style:style style:name="T107" style:family="text">
      <style:text-properties fo:font-weight="bold" officeooo:rsid="004209e4" style:font-weight-asian="bold" style:font-weight-complex="bold"/>
    </style:style>
    <style:style style:name="T108" style:family="text">
      <style:text-properties officeooo:rsid="005d3a4f"/>
    </style:style>
    <style:style style:name="T109" style:family="text">
      <style:text-properties officeooo:rsid="008c2525"/>
    </style:style>
    <style:style style:name="T110" style:family="text">
      <style:text-properties officeooo:rsid="008e0f47"/>
    </style:style>
    <style:style style:name="T111" style:family="text">
      <style:text-properties officeooo:rsid="008fbfad"/>
    </style:style>
    <style:style style:name="T112" style:family="text">
      <style:text-properties officeooo:rsid="004543f2"/>
    </style:style>
    <style:style style:name="T113" style:family="text">
      <style:text-properties officeooo:rsid="01000fef"/>
    </style:style>
    <style:style style:name="T114" style:family="text">
      <style:text-properties fo:font-weight="bold" fo:background-color="#ffff00" loext:char-shading-value="0" style:font-weight-asian="bold" style:font-weight-complex="bold"/>
    </style:style>
    <style:style style:name="T115" style:family="text">
      <style:text-properties style:text-position="super 58%" officeooo:rsid="00d58fcd"/>
    </style:style>
    <style:style style:name="T116" style:family="text">
      <style:text-properties fo:color="#127622" loext:opacity="100%" style:text-position="super 58%" officeooo:rsid="00d58fcd"/>
    </style:style>
    <style:style style:name="T117" style:family="text">
      <style:text-properties officeooo:rsid="007b54a7"/>
    </style:style>
    <style:style style:name="T118" style:family="text">
      <style:text-properties officeooo:rsid="01028ddc"/>
    </style:style>
    <style:style style:name="T119" style:family="text">
      <style:text-properties officeooo:rsid="0091472d"/>
    </style:style>
    <style:style style:name="T120" style:family="text">
      <style:text-properties fo:font-weight="bold" officeooo:rsid="0091472d" style:font-weight-asian="bold" style:font-weight-complex="bold"/>
    </style:style>
    <style:style style:name="T121" style:family="text">
      <style:text-properties style:font-name="Liberation Serif" fo:font-size="14pt" style:font-size-asian="14pt" style:font-size-complex="14pt"/>
    </style:style>
    <style:style style:name="T122" style:family="text">
      <style:text-properties style:font-name="Liberation Serif" fo:font-size="14pt" officeooo:rsid="00d7acc1" style:font-size-asian="14pt" style:font-size-complex="14pt"/>
    </style:style>
    <style:style style:name="T123" style:family="text">
      <style:text-properties officeooo:rsid="00df1307"/>
    </style:style>
    <style:style style:name="T124" style:family="text">
      <style:text-properties officeooo:rsid="00970d98"/>
    </style:style>
    <style:style style:name="T125" style:family="text">
      <style:text-properties officeooo:rsid="009716da"/>
    </style:style>
    <style:style style:name="T126" style:family="text">
      <style:text-properties officeooo:rsid="01085faf"/>
    </style:style>
    <style:style style:name="T127" style:family="text">
      <style:text-properties fo:background-color="transparent" loext:char-shading-value="0"/>
    </style:style>
    <style:style style:name="T128" style:family="text">
      <style:text-properties officeooo:rsid="009b045b"/>
    </style:style>
    <style:style style:name="T129" style:family="text">
      <style:text-properties officeooo:rsid="00d9a00c"/>
    </style:style>
    <style:style style:name="T130" style:family="text">
      <style:text-properties officeooo:rsid="00dcd436"/>
    </style:style>
    <style:style style:name="T131" style:family="text">
      <style:text-properties officeooo:rsid="00dbbb74"/>
    </style:style>
    <style:style style:name="T132" style:family="text">
      <style:text-properties fo:font-weight="bold" officeooo:rsid="00dbbb74" style:font-weight-asian="bold" style:font-weight-complex="bold"/>
    </style:style>
    <style:style style:name="T133" style:family="text">
      <style:text-properties fo:color="#127622" loext:opacity="100%" officeooo:rsid="00dcd436"/>
    </style:style>
    <style:style style:name="T134" style:family="text">
      <style:text-properties officeooo:rsid="00de927b"/>
    </style:style>
    <style:style style:name="T135" style:family="text">
      <style:text-properties fo:font-weight="bold" officeooo:rsid="009ec347" style:font-weight-asian="bold" style:font-weight-complex="bold"/>
    </style:style>
    <style:style style:name="T136" style:family="text">
      <style:text-properties officeooo:rsid="00e19760"/>
    </style:style>
    <style:style style:name="T137" style:family="text">
      <style:text-properties fo:font-weight="bold" officeooo:rsid="0110dd8b" style:font-weight-asian="bold" style:font-weight-complex="bold"/>
    </style:style>
    <style:style style:name="T138" style:family="text">
      <style:text-properties officeooo:rsid="0110dd8b"/>
    </style:style>
    <style:style style:name="T139" style:family="text">
      <style:text-properties officeooo:rsid="00b15f8f"/>
    </style:style>
    <style:style style:name="T140" style:family="text">
      <style:text-properties officeooo:rsid="00a5defc"/>
    </style:style>
    <style:style style:name="T141" style:family="text">
      <style:text-properties officeooo:rsid="00a6bdb8"/>
    </style:style>
    <style:style style:name="T142" style:family="text">
      <style:text-properties officeooo:rsid="01136598"/>
    </style:style>
    <style:style style:name="T143" style:family="text">
      <style:text-properties fo:font-weight="bold" officeooo:rsid="01136598" style:font-weight-asian="bold" style:font-weight-complex="bold"/>
    </style:style>
    <style:style style:name="T144" style:family="text">
      <style:text-properties officeooo:rsid="00a87314"/>
    </style:style>
    <style:style style:name="T145" style:family="text">
      <style:text-properties fo:font-style="italic" officeooo:rsid="00a6bdb8" style:font-style-asian="italic" style:font-style-complex="italic"/>
    </style:style>
    <style:style style:name="T146" style:family="text">
      <style:text-properties fo:font-weight="bold" officeooo:rsid="00a6bdb8" style:font-weight-asian="bold" style:font-weight-complex="bold"/>
    </style:style>
    <style:style style:name="T147" style:family="text">
      <style:text-properties officeooo:rsid="00aad62e"/>
    </style:style>
    <style:style style:name="T148" style:family="text">
      <style:text-properties officeooo:rsid="00aca357"/>
    </style:style>
    <style:style style:name="T149" style:family="text">
      <style:text-properties officeooo:rsid="00a98020"/>
    </style:style>
    <style:style style:name="T150" style:family="text">
      <style:text-properties officeooo:rsid="00abe8e2"/>
    </style:style>
    <style:style style:name="T151" style:family="text">
      <style:text-properties fo:color="#127622" loext:opacity="100%" officeooo:rsid="00abe8e2"/>
    </style:style>
    <style:style style:name="T152" style:family="text">
      <style:text-properties officeooo:rsid="011dc0d1"/>
    </style:style>
    <style:style style:name="T153" style:family="text">
      <style:text-properties officeooo:rsid="00ada665"/>
    </style:style>
    <style:style style:name="T154" style:family="text">
      <style:text-properties officeooo:rsid="0115c5be"/>
    </style:style>
    <style:style style:name="T155" style:family="text">
      <style:text-properties fo:font-weight="bold" officeooo:rsid="00abe8e2" style:font-weight-asian="bold" style:font-weight-complex="bold"/>
    </style:style>
    <style:style style:name="T156" style:family="text">
      <style:text-properties officeooo:rsid="00b31804"/>
    </style:style>
    <style:style style:name="T157" style:family="text">
      <style:text-properties officeooo:rsid="012577a2"/>
    </style:style>
    <style:style style:name="T158" style:family="text">
      <style:text-properties fo:color="#127622" loext:opacity="100%" officeooo:rsid="012577a2"/>
    </style:style>
    <style:style style:name="T159" style:family="text">
      <style:text-properties fo:background-color="#fff5ce" loext:char-shading-value="0"/>
    </style:style>
    <style:style style:name="T160" style:family="text">
      <style:text-properties fo:font-weight="normal" fo:background-color="#fff5ce" loext:char-shading-value="0" style:font-weight-asian="normal" style:font-weight-complex="normal"/>
    </style:style>
    <style:style style:name="T161" style:family="text">
      <style:text-properties officeooo:rsid="0119a61d"/>
    </style:style>
    <style:style style:name="T162" style:family="text">
      <style:text-properties officeooo:rsid="00b7fb6a"/>
    </style:style>
    <style:style style:name="T163" style:family="text">
      <style:text-properties fo:color="#127622" loext:opacity="100%" officeooo:rsid="012b79e2"/>
    </style:style>
    <style:style style:name="T164" style:family="text">
      <style:text-properties style:font-name="Liberation Serif" fo:font-size="14pt" fo:font-weight="normal" officeooo:rsid="00ea6636" style:font-size-asian="12.25pt" style:font-weight-asian="normal" style:font-size-complex="14pt" style:font-weight-complex="normal"/>
    </style:style>
    <style:style style:name="T165" style:family="text">
      <style:text-properties style:font-name="Liberation Serif" fo:font-size="14pt" fo:font-weight="normal" officeooo:rsid="00eb3936" style:font-size-asian="12.25pt" style:font-weight-asian="normal" style:font-size-complex="14pt" style:font-weight-complex="normal"/>
    </style:style>
    <style:style style:name="T166" style:family="text">
      <style:text-properties fo:font-weight="bold"/>
    </style:style>
    <style:style style:name="T167" style:family="text">
      <style:text-properties fo:font-style="italic"/>
    </style:style>
    <style:style style:name="T168" style:family="text">
      <style:text-properties style:font-name="Liberation Sans" fo:font-size="12pt" officeooo:rsid="012e3240" style:font-size-asian="12pt" style:font-size-complex="12pt"/>
    </style:style>
    <style:style style:name="T169" style:family="text">
      <style:text-properties fo:color="#ff0000" loext:opacity="100%" fo:background-color="#ffff00"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an apostle?</text:p>
      <text:p text:style-name="Standard"/>
      <text:p text:style-name="P2"><text:span text:style-name="T1">A 462</text:span><text:span text:style-name="T2">+</text:span><text:span text:style-name="T1"> year old t</text:span><text:span text:style-name="T3">radition</text:span><text:span text:style-name="T4"> </text:span><text:span text:style-name="T3">teaches us that an apostle was someone who saw the risen Christ. </text:span><text:span text:style-name="T1">That same t</text:span><text:span text:style-name="T5">radition also teaches us that the “office” of apostle ended in the 1</text:span><text:span text:style-name="T6">st</text:span><text:span text:style-name="T5"> century </text:span><text:span text:style-name="T7">(hereafter referred to as “the tradition”)</text:span><text:span text:style-name="T5">. </text:span><text:span text:style-name="T8">In this Bible study we’re going to look at both sides of </text:span><text:span text:style-name="T7">the</text:span><text:span text:style-name="T8"> coin – verses that seem to support </text:span><text:span text:style-name="T7">the</text:span><text:span text:style-name="T8"> tradition and verses that seem to contradict </text:span><text:span text:style-name="T7">the</text:span><text:span text:style-name="T8"> tradition. In the end, you’ll have to decide for yourself what you believe </text:span><text:span text:style-name="T9">and you are encouraged to </text:span><text:span text:style-name="T10">study beyond what is </text:span><text:span text:style-name="T9">presented</text:span><text:span text:style-name="T8">. But, do keep in mind that the writer of this document has a bias in that he does not believe </text:span><text:span text:style-name="T7">the</text:span><text:span text:style-name="T8"> tradition is truth </text:span><text:span text:style-name="T9">and that bias will be plainly evident.</text:span></text:p>
      <text:p text:style-name="P2"/>
      <text:p text:style-name="P3">Textbook definition</text:p>
      <text:p text:style-name="Standard"/>
      <table:table table:name="Table3" table:style-name="Table3">
        <table:table-column table:style-name="Table3.A"/>
        <table:table-row>
          <table:table-cell table:style-name="Table3.A1" office:value-type="string">
            <text:p text:style-name="Standard"><text:span text:style-name="T11">G652</text:span> ἀπόστολος (apóstolos | ap-os'-tol-os)</text:p>
            <text:p text:style-name="Standard"/>
            <text:p text:style-name="P4"><text:span text:style-name="T11">Derivation</text:span>: from <text:span text:style-name="T11">G649</text:span></text:p>
            <text:p text:style-name="P4"><text:span text:style-name="T11">Strong's</text:span>: a delegate; specially, an ambassador of the Gospel; officially a commissioner of Christ ("apostle") (with miraculous powers)</text:p>
            <text:p text:style-name="P4"><text:span text:style-name="T11">KJV</text:span>: apostle <text:span text:style-name="T12">(</text:span><text:span text:style-name="T13">Mat 10:2</text:span><text:span text:style-name="T12">)</text:span>, messenger <text:span text:style-name="T14">(</text:span><text:span text:style-name="T15">2Cor 8:23</text:span><text:span text:style-name="T14">)</text:span>, he that is sent <text:span text:style-name="T14">(</text:span><text:span text:style-name="T15">Joh 13:16</text:span><text:span text:style-name="T14">)</text:span>.</text:p>
            <text:p text:style-name="P5"/>
            <text:p text:style-name="Standard"><text:span text:style-name="T11">See</text:span>: G649</text:p>
            <text:p text:style-name="Standard"/>
            <text:p text:style-name="P6"><text:span text:style-name="T11">Cognate Group</text:span>: G651 (apostleship), G649 (put in), G5570 (false teacher), G1821 (send), G652 (apostle), G3992 (send) Variants: ἀπόστολος</text:p>
            <text:p text:style-name="P6"/>
            <text:p text:style-name="P6"><text:span text:style-name="T11">Hebrew Equivalents</text:span>: H7971 שָׁלַח</text:p>
            <text:p text:style-name="Horizontal_20_Line"/>
            <text:p text:style-name="Standard"><text:span text:style-name="T11">G649</text:span> ἀποστέλλω (apostéllō | ap-os-tel'-lo)</text:p>
            <text:p text:style-name="Standard"/>
            <text:p text:style-name="Standard"><text:span text:style-name="T11">Derivation</text:span>: from G575 and G4724</text:p>
            <text:p text:style-name="P6"><text:span text:style-name="T11">Strong's</text:span>: set apart, i.e. (by implication) to send out (properly, on a mission) literally or figuratively</text:p>
            <text:p text:style-name="P6"><text:span text:style-name="T11">KJV</text:span>: put in, send (away, forth, out), set (at liberty).</text:p>
            <text:p text:style-name="P6"/>
            <text:p text:style-name="P7"><text:span text:style-name="T11">See</text:span>: G575</text:p>
            <text:p text:style-name="P7"><text:span text:style-name="T11">See</text:span>: G4724</text:p>
            <text:p text:style-name="Standard"/>
            <text:p text:style-name="P6"><text:span text:style-name="T11">Cognate Group</text:span>: G651 (apostleship), G649 (put in), G5570 (false teacher), G1821 (send), G652 (apostle), G3992 (send) Variants: ἀποστέλλω, ἐμπέμπω</text:p>
            <text:p text:style-name="P6"/>
            <text:p text:style-name="P6"><text:span text:style-name="T11">Hebrew Equivalents</text:span>: H935 בֹּוא, H2470 חָלָה, H3381 יָרַד, H4284 מַחֲשָׁבָה, H5182 נְחַת, H5398 נָשַׁף, H5414 נָתַן, H5493 סוּר, H5774 עוּף, H6327 פּוּץ, H6680 צָוָה, H7725 שׁוּב, H7971 שָׁלַח, H8421 תּוּב</text:p>
          </table:table-cell>
        </table:table-row>
      </table:table>
      <text:p text:style-name="P8"/>
      <text:p text:style-name="P9"><text:span text:style-name="T16">The word apostle itself simply means “messenger” </text:span><text:span text:style-name="T17">(</text:span><text:span text:style-name="T18">2Cor 8:23</text:span><text:span text:style-name="T17">) </text:span><text:span text:style-name="T16">or “he that is sent” </text:span><text:span text:style-name="T17">(</text:span><text:span text:style-name="T18">John 13:16</text:span><text:span text:style-name="T17">)</text:span><text:span text:style-name="T16">. </text:span><text:span text:style-name="T17">Every usage of G652 is someone that is sent of God </text:span><text:span text:style-name="T19">(including Jesus </text:span><text:span text:style-name="T20">Heb 3:1</text:span><text:span text:style-name="T19">)</text:span><text:span text:style-name="T21">. </text:span><text:span text:style-name="T22">I think it goes without saying that God is the one that does the sending. So, a strict </text:span><text:span text:style-name="T23">Biblical</text:span><text:span text:style-name="T22"> definition of apostle could be “one that is sent of Go</text:span><text:span text:style-name="T24">d</text:span><text:span text:style-name="T22">”.</text:span></text:p>
      <text:p text:style-name="P10"/>
      <text:p text:style-name="P11">We’re going to start with <text:span text:style-name="T25">expanding that basic definition based solely on </text:span><text:span text:style-name="T26">how </text:span><text:span text:style-name="T25">the Bible uses the word.</text:span></text:p>
      <text:p text:style-name="P11"/>
      <text:p text:style-name="P11"><text:span text:style-name="T25">Then, we’ll move into </text:span>verses <text:span text:style-name="T27">that </text:span><text:span text:style-name="T28">challenge the tradition. Otherwise, when we get to the verses that are used to support the tradition you won’t understand the scrutiny they will be subjected to.</text:span></text:p>
      <text:p text:style-name="P12"/>
      <text:p text:style-name="P12"/>
      <text:p text:style-name="P13"><text:soft-page-break/><text:span text:style-name="T29">The twelve </text:span><text:span text:style-name="T30">apostles</text:span></text:p>
      <text:p text:style-name="P14">(AKA “the twelve” <text:span text:style-name="T31">&amp; </text:span>“the twelve apostles of the Lamb”)</text:p>
      <text:p text:style-name="Standard"/>
      <table:table table:name="Table1" table:style-name="Table1">
        <table:table-column table:style-name="Table1.A"/>
        <table:table-row>
          <table:table-cell table:style-name="Table1.A1" office:value-type="string">
            <text:p text:style-name="P15">Matthew 10:2</text:p>
            <text:p text:style-name="Table_20_Contents">Now the names of <text:span text:style-name="T32">the twelve apostles</text:span><text:span text:style-name="T33">G652</text:span> are these; The first, Simon, who is called Peter, and Andrew his brother; James the son of Zebedee, and John his brother;</text:p>
            <text:p text:style-name="Table_20_Contents"/>
            <text:p text:style-name="P15">Mark 6:30</text:p>
            <text:p text:style-name="P16">And <text:span text:style-name="T32">the apostles</text:span><text:span text:style-name="T33">G652</text:span> gathered themselves together unto Jesus, and told him all things, both what they had done, and what they had taught.</text:p>
            <text:p text:style-name="Table_20_Contents"/>
            <text:p text:style-name="P15">Luke 6:13</text:p>
            <text:p text:style-name="Table_20_Contents">And when it was day, he called unto him <text:span text:style-name="T34">his disciples</text:span>: and <text:span text:style-name="T35">of them he chose twelve</text:span>, whom <text:span text:style-name="T32">also he named apostles</text:span><text:span text:style-name="T33">G652</text:span>;</text:p>
          </table:table-cell>
        </table:table-row>
      </table:table>
      <text:p text:style-name="P17"/>
      <text:list text:style-name="L1">
        <text:list-item>
          <text:p text:style-name="P18">“<text:span text:style-name="T36">The twelve” </text:span><text:span text:style-name="T37">disciples </text:span><text:span text:style-name="T38">are also called apostles </text:span><text:span text:style-name="T39">during</text:span><text:span text:style-name="T38"> Christ’s ministry.</text:span></text:p>
        </text:list-item>
        <text:list-item>
          <text:p text:style-name="P19">Six times <text:span text:style-name="T40">(potentially seven) </text:span>“<text:span text:style-name="T41">the twelve”</text:span> are called apostles <text:span text:style-name="T11">before</text:span> Christ resurrected.</text:p>
        </text:list-item>
      </text:list>
      <text:p text:style-name="P20"/>
      <text:p text:style-name="P20">One <text:span text:style-name="T42">could</text:span> argue that God was using a prolepsis <text:span text:style-name="T43">when He </text:span><text:span text:style-name="T44">called</text:span><text:span text:style-name="T43"> them apostles</text:span>, as He <text:span text:style-name="T45">did</text:span> in <text:span text:style-name="T46">many </text:span>other parts of scripture.</text:p>
      <text:p text:style-name="P20"/>
      <text:list text:continue-numbering="true" text:style-name="L1">
        <text:list-item>
          <text:list>
            <text:list-item>
              <text:p text:style-name="P21">Jerusalem</text:p>
              <text:list>
                <text:list-item>
                  <text:p text:style-name="P22">God calls Jebus Jerusalem long before it was conquered <text:span text:style-name="T47">by king David.</text:span></text:p>
                </text:list-item>
                <text:list-item>
                  <text:p text:style-name="P23"><text:span text:style-name="T48">Jos 10:1,3,5,23, 15:8</text:span><text:span text:style-name="T43">, etc.</text:span></text:p>
                </text:list-item>
              </text:list>
            </text:list-item>
            <text:list-item>
              <text:p text:style-name="P24">Bethel</text:p>
              <text:list>
                <text:list-item>
                  <text:p text:style-name="P24">Jacob names this place Bethel <text:span text:style-name="T49">in </text:span><text:span text:style-name="T50">Gen 28:19</text:span><text:span text:style-name="T49">.</text:span></text:p>
                </text:list-item>
                <text:list-item>
                  <text:p text:style-name="P24">His grandfather Abraham visited the same <text:span text:style-name="T51">place</text:span> in <text:span text:style-name="T52">Gen 12:8</text:span>, <text:span text:style-name="T52">13:3</text:span> and God calls it by its future-name <text:span text:style-name="T53">Bethel.</text:span></text:p>
                </text:list-item>
              </text:list>
            </text:list-item>
            <text:list-item>
              <text:p text:style-name="P25">The city of Dan / <text:span text:style-name="T54">northern allotment of Dan</text:span></text:p>
              <text:list>
                <text:list-item>
                  <text:p text:style-name="P25">In <text:span text:style-name="T52">Genesis 14:14-15</text:span>, Abraham pursued the kidnappers of his nephew Lot “unto Dan”.</text:p>
                </text:list-item>
                <text:list-item>
                  <text:p text:style-name="P25">Not only did the tribe of Dan not exist yet but neither did the man <text:span text:style-name="T55">that</text:span> the tribe <text:span text:style-name="T56">and the city </text:span>was named after <text:span text:style-name="T56">(</text:span><text:span text:style-name="T57">Jdg 18:29</text:span><text:span text:style-name="T56">).</text:span></text:p>
                </text:list-item>
              </text:list>
            </text:list-item>
            <text:list-item>
              <text:p text:style-name="P26">The Amalekites <text:span text:style-name="T58">(</text:span><text:span text:style-name="T59">Gen 14:7</text:span><text:span text:style-name="T58">)</text:span></text:p>
              <text:list>
                <text:list-item>
                  <text:p text:style-name="P27">Amalek the grandson of Esau (<text:span text:style-name="T52">Gen 36:12</text:span>) wasn’t born yet.</text:p>
                </text:list-item>
              </text:list>
            </text:list-item>
            <text:list-item>
              <text:p text:style-name="P28">King Josiah (<text:span text:style-name="T52">1Ki 13:2</text:span>)</text:p>
              <text:list>
                <text:list-item>
                  <text:p text:style-name="P28">Called by name ~300 years before he was born.</text:p>
                </text:list-item>
              </text:list>
            </text:list-item>
            <text:list-item>
              <text:p text:style-name="P29">King Cyrus of Persia (Isa 45:1-4)</text:p>
              <text:list>
                <text:list-item>
                  <text:p text:style-name="P29">Called by name ~150 years before he was born.</text:p>
                </text:list-item>
              </text:list>
            </text:list-item>
            <text:list-item>
              <text:p text:style-name="P30">Ur of the Chaldees (<text:span text:style-name="T52">Gen 11:28,31</text:span>)</text:p>
              <text:list>
                <text:list-item>
                  <text:p text:style-name="P31">The Chaldeans had not yet risen to prominence or established dominion of that region yet.</text:p>
                </text:list-item>
              </text:list>
            </text:list-item>
          </text:list>
        </text:list-item>
      </text:list>
      <text:p text:style-name="Standard"/>
      <text:p text:style-name="P32"/>
      <text:p text:style-name="P32"/>
      <text:p text:style-name="P32"/>
      <text:p text:style-name="P32"/>
      <text:p text:style-name="P32"/>
      <text:p text:style-name="P32"/>
      <text:p text:style-name="P32"/>
      <text:p text:style-name="P32"/>
      <text:p text:style-name="P32"/>
      <text:p text:style-name="P32"/>
      <text:p text:style-name="P33"><text:soft-page-break/>Other apostles <text:span text:style-name="T60">in the NT</text:span></text:p>
      <text:p text:style-name="Standard"/>
      <table:table table:name="Table4" table:style-name="Table4">
        <table:table-column table:style-name="Table4.A"/>
        <table:table-row>
          <table:table-cell table:style-name="Table4.A1" office:value-type="string">
            <text:p text:style-name="P15">Acts 14:14</text:p>
            <text:p text:style-name="Table_20_Contents">Which when <text:span text:style-name="T32">the apostles</text:span><text:span text:style-name="T33">G652</text:span><text:span text:style-name="T32">, Barnabas and Paul</text:span>, heard of, they rent their clothes, and ran in among the people, crying out,</text:p>
            <text:p text:style-name="Table_20_Contents"/>
            <text:p text:style-name="P15">Romans 16:7</text:p>
            <text:p text:style-name="Table_20_Contents">Salute Andronicus and Junia, my kinsmen, and my fellowprisoners, <text:span text:style-name="T32">who are of note among the apostles</text:span><text:span text:style-name="T33">G652</text:span>, who also were in Christ before me.</text:p>
            <text:p text:style-name="Table_20_Contents"/>
            <text:p text:style-name="P15">Galatians 1:19</text:p>
            <text:p text:style-name="Table_20_Contents">But other of <text:span text:style-name="T32">the apostles</text:span><text:span text:style-name="T33">G652</text:span> saw I none, <text:span text:style-name="T32">save James</text:span> the Lord's brother.</text:p>
            <text:p text:style-name="Table_20_Contents"/>
            <text:p text:style-name="Table_20_Contents"><text:span text:style-name="T52">1 Thessalonians 2:6</text:span> <text:span text:style-name="T61">(Silas/Silvanus &amp; Timothy; cf. </text:span><text:span text:style-name="T62">1Thess 1:1</text:span><text:span text:style-name="T61">)</text:span></text:p>
            <text:p text:style-name="Table_20_Contents">Nor of men sought we glory, neither of you, nor yet of others, when we might have been burdensome, as <text:span text:style-name="T32">the apostles</text:span><text:span text:style-name="T33">G652</text:span><text:span text:style-name="T32"> of Christ</text:span>.</text:p>
          </table:table-cell>
        </table:table-row>
      </table:table>
      <text:p text:style-name="P34"/>
      <text:list text:style-name="L2">
        <text:list-item>
          <text:p text:style-name="P35"><text:span text:style-name="T63">An</text:span><text:span text:style-name="T64">dronicus, Junia, </text:span><text:span text:style-name="T63">and Timothy</text:span><text:span text:style-name="T64"> are </text:span><text:span text:style-name="T65">never</text:span><text:span text:style-name="T64"> </text:span><text:span text:style-name="T63">recorded as having seen the risen Christ </text:span><text:span text:style-name="T66">or</text:span><text:span text:style-name="T67"> having any miraculous powers.</text:span></text:p>
          <text:list>
            <text:list-item>
              <text:p text:style-name="P36"><text:span text:style-name="T68">Barnabas (Joses </text:span><text:span text:style-name="T69">Acts 4:36</text:span><text:span text:style-name="T68">)</text:span> is not record<text:span text:style-name="T70">ed</text:span> as having seen the risen Christ but is recorded as “having miraculous powers” (<text:span text:style-name="T52">Acts 15:12</text:span>).</text:p>
            </text:list-item>
            <text:list-item>
              <text:p text:style-name="P37">James is recorded as having seen the risen Christ (<text:span text:style-name="T52">1Cor 15:7</text:span>) but is not recorded as “having miraculous powers”.</text:p>
            </text:list-item>
            <text:list-item>
              <text:p text:style-name="P38">Silas is not recorded as having seen the risen Christ but is recorded as praying with Paul before the earthquake happened (which may or may not imply “miraculous powers”).</text:p>
            </text:list-item>
          </text:list>
        </text:list-item>
      </text:list>
      <text:p text:style-name="P34"/>
      <text:p text:style-name="P39">One <text:span text:style-name="T42">could</text:span> argue that because they are called apostles it <text:span text:style-name="T42">implies</text:span> that they did see <text:span text:style-name="T71">the risen Christ</text:span> at some point but it just isn’t recorded <text:span text:style-name="T72">and/</text:span><text:span text:style-name="T73">or that they had miraculous powers that just weren’t recorded.</text:span></text:p>
      <text:p text:style-name="P39"/>
      <text:p text:style-name="P40">For a strict definition, however, records of those <text:span text:style-name="T74">events </text:span><text:span text:style-name="T75">for </text:span><text:span text:style-name="T76">every</text:span><text:span text:style-name="T75"> person called an apostle </text:span>would absolutely be required thus rendering Strong’s definition <text:span text:style-name="T77">of apostle G</text:span><text:span text:style-name="T78">652</text:span><text:span text:style-name="T77"> </text:span><text:span text:style-name="T71">severely </text:span>flawed <text:span text:style-name="T79">because it requires implication and assumption and not proof.</text:span></text:p>
      <text:p text:style-name="P40"/>
      <text:p text:style-name="P40"/>
      <text:p text:style-name="P40"><text:span text:style-name="T80">Ask yourself a serious question: should our beliefs be based on what is implied or by </text:span><text:span text:style-name="T81">what can be proven with scripture?</text:span></text:p>
      <text:p text:style-name="P41"/>
      <table:table table:name="Table14" table:style-name="Table14">
        <table:table-column table:style-name="Table14.A"/>
        <table:table-row>
          <table:table-cell table:style-name="Table14.A1" office:value-type="string">
            <text:p text:style-name="P15">1 Thessalonians 5:21</text:p>
            <text:p text:style-name="Table_20_Contents"><text:span text:style-name="T34">Prove </text:span><text:span text:style-name="T82">all</text:span><text:span text:style-name="T34"> things</text:span>; hold fast that which is good.</text:p>
          </table:table-cell>
        </table:table-row>
      </table:table>
      <text:p text:style-name="P4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2"/>
      <text:p text:style-name="P42"/>
      <text:p text:style-name="P42"/>
      <text:p text:style-name="P42"/>
      <text:p text:style-name="P43">Modern <text:span text:style-name="T83">English </text:span>grammar rules do not <text:span text:style-name="T84">fit</text:span> any <text:span text:style-name="T84">better</text:span> than modern definitions</text:p>
      <text:p text:style-name="P44"/>
      <text:p text:style-name="P45">In <text:span text:style-name="T85">modern </text:span>English grammar we <text:span text:style-name="T85">always </text:span>expect that the coordinating conjunction “and” joins two mutually exclusive classes. <text:span text:style-name="T85">The problem arises, similar to when we apply modern definitions to Biblical words, when we apply </text:span><text:span text:style-name="T86">strict </text:span><text:span text:style-name="T85">modern grammar rules to the Bible instead of </text:span><text:span text:style-name="T87">letting the Bible define itself.</text:span></text:p>
      <text:p text:style-name="P45"/>
      <text:p text:style-name="P46">This is most easily evidenced in both the old and the new testament in <text:span text:style-name="T88">a </text:span>figure of speech <text:span text:style-name="T88">which is </text:span>called “hendiadys”. <text:span text:style-name="T83">Simply put, it’s when one object is described two different ways joined by the word “and”.</text:span></text:p>
      <text:p text:style-name="P46"/>
      <table:table table:name="Table8" table:style-name="Table8">
        <table:table-column table:style-name="Table8.A"/>
        <table:table-row>
          <table:table-cell table:style-name="Table8.A1" office:value-type="string">
            <text:p text:style-name="P47">Hendiadys</text:p>
            <text:p text:style-name="P48">/henˈdīədəs/</text:p>
            <text:p text:style-name="P49"><text:line-break/><text:span text:style-name="T86">A h</text:span>endiadys is a figure of speech where a single, complex idea is expressed by joining two words together with a conjunction (like "and") instead of using a modifier. <text:span text:style-name="T86">Its name is d</text:span>erived from the Greek phrase hen-dia-dyoin ("one through two"), it gives a thought more emphasis or poetic force.</text:p>
            <text:p text:style-name="P49"/>
            <text:p text:style-name="P49">Common Examples:</text:p>
            <text:p text:style-name="P49"/>
            <text:list text:style-name="L3">
              <text:list-item>
                <text:p text:style-name="P50">“<text:span text:style-name="T86">Nice and warm” instead of “pleasantly warm”</text:span></text:p>
              </text:list-item>
              <text:list-item>
                <text:p text:style-name="P50">“<text:span text:style-name="T86">Good and ready” instead of “completely ready”</text:span></text:p>
              </text:list-item>
              <text:list-item>
                <text:p text:style-name="P50">“<text:span text:style-name="T86">Sick and Tired” instead of “exceedingly tired” or “deeply frustrated”</text:span></text:p>
              </text:list-item>
              <text:list-item>
                <text:p text:style-name="P51">“Try and do it” instead of “try to do it”</text:p>
              </text:list-item>
            </text:list>
            <text:p text:style-name="P52"/>
          </table:table-cell>
        </table:table-row>
      </table:table>
      <text:list text:continue-numbering="true" text:style-name="L3">
        <text:list-item>
          <text:p text:style-name="P53">In the Bible, the hendiadys is a perfect companion to the many other types of parallelisms already used that <text:span text:style-name="T11">teach us</text:span> what the Bible means when it uses certain words and phrases.</text:p>
        </text:list-item>
      </text:list>
      <text:p text:style-name="Standard"/>
      <text:p text:style-name="Standard"/>
      <text:p text:style-name="P54">Hendiadys <text:span text:style-name="T89">in the OT</text:span></text:p>
      <text:p text:style-name="Standard"/>
      <table:table table:name="Table9" table:style-name="Table9">
        <table:table-column table:style-name="Table9.A"/>
        <table:table-row>
          <table:table-cell table:style-name="Table9.A1" office:value-type="string">
            <text:p text:style-name="P55">Daniel 4:13-14</text:p>
            <text:p text:style-name="P49"><text:span text:style-name="T33">13</text:span> I saw in the visions of my head upon my bed, and, behold, <text:span text:style-name="T32">a watcher and an holy one</text:span> came down from heaven;</text:p>
            <text:p text:style-name="P49"><text:span text:style-name="T33">14</text:span> <text:span text:style-name="T32">He</text:span> cried aloud, and said thus, Hew down the tree, and cut off his branches, shake off his leaves, and scatter his fruit: let the beasts get away from under it, and the fowls from his branches:</text:p>
          </table:table-cell>
        </table:table-row>
      </table:table>
      <text:list text:style-name="L4">
        <text:list-item>
          <text:p text:style-name="P56"><text:soft-page-break/>Notice the shift to the singular pronoun “He” in verse 14?</text:p>
        </text:list-item>
        <text:list-item>
          <text:p text:style-name="P57">To which noun is the “He” referring?</text:p>
        </text:list-item>
        <text:list-item>
          <text:p text:style-name="P57"><text:span text:style-name="T90">The answer is: both! </text:span><text:span text:style-name="T91">In this case, instead of the “and” </text:span><text:span text:style-name="T92">separating</text:span><text:span text:style-name="T91"> two groups its </text:span><text:span text:style-name="T92">joining</text:span><text:span text:style-name="T91"> them.</text:span></text:p>
        </text:list-item>
        <text:list-item>
          <text:p text:style-name="P58"><text:span text:style-name="T93">Wherefore,</text:span> “a watcher” and “an holy one” both <text:span text:style-name="T94">describe</text:span> a <text:span text:style-name="T42">singular</text:span> <text:span text:style-name="T95">object</text:span> two different ways <text:span text:style-name="T94">which is </text:span><text:span text:style-name="T96">a textbook </text:span><text:span text:style-name="T97">hendiadys.</text:span></text:p>
        </text:list-item>
      </text:list>
      <text:p text:style-name="Standard"/>
      <text:p text:style-name="P59">So, as we can see, it’s very dangerous to apply our modern English grammar rule that “and always joins two mutually exclusive classes”. And if it can’t be applied in at least one place, we can’t rely on it everywhere. Instead, we <text:span text:style-name="T98">do what we always need to do to avoid error and </text:span>rely <text:span text:style-name="T99">solely</text:span><text:span text:style-name="T100"> </text:span>on the context of scripture alone.</text:p>
      <text:p text:style-name="Standard"/>
      <text:p text:style-name="Standard"/>
      <text:p text:style-name="Standard"/>
      <text:p text:style-name="Standard"/>
      <text:p text:style-name="Standard"/>
      <text:p text:style-name="Standard"/>
      <text:p text:style-name="Standard"/>
      <text:p text:style-name="Standard"/>
      <text:p text:style-name="P60">“Scripture defines scripture” applies to more than just definitions</text:p>
      <text:p text:style-name="Standard"/>
      <table:table table:name="Table5" table:style-name="Table5">
        <table:table-column table:style-name="Table5.A"/>
        <table:table-row>
          <table:table-cell table:style-name="Table5.A1" office:value-type="string">
            <text:p text:style-name="P15">Luke 11:49-51</text:p>
            <text:p text:style-name="Table_20_Contents"><text:span text:style-name="T33">49</text:span> <text:span text:style-name="T101">Therefore also said the wisdom of God, I will send </text:span><text:span text:style-name="T102">them</text:span><text:span text:style-name="T101"> </text:span><text:span text:style-name="T103">prophets and apostles</text:span><text:span text:style-name="T33">G652</text:span><text:span text:style-name="T101">, and some of </text:span><text:span text:style-name="T103">them</text:span><text:span text:style-name="T101"> </text:span><text:span text:style-name="T102">they</text:span><text:span text:style-name="T101"> shall slay and persecute:</text:span></text:p>
            <text:p text:style-name="Table_20_Contents"><text:span text:style-name="T33">50</text:span> <text:span text:style-name="T101">That the blood of all </text:span><text:span text:style-name="T103">the prophets</text:span><text:span text:style-name="T101">, which was shed from the foundation of the world, may be required of this generation;</text:span></text:p>
            <text:p text:style-name="Table_20_Contents"><text:span text:style-name="T33">51</text:span> <text:span text:style-name="T104">From</text:span><text:span text:style-name="T101"> the blood of </text:span><text:span text:style-name="T104">Abel</text:span><text:span text:style-name="T101"> </text:span><text:span text:style-name="T104">unto</text:span><text:span text:style-name="T101"> the blood of </text:span><text:span text:style-name="T104">Zacharias</text:span><text:span text:style-name="T101">, which perished between the altar and the temple: verily I say unto you, It shall be required of this generation.</text:span></text:p>
          </table:table-cell>
        </table:table-row>
      </table:table>
      <text:list text:style-name="L5">
        <text:list-item>
          <text:p text:style-name="P61"><text:span text:style-name="T105">The prophets that God </text:span><text:span text:style-name="T106">sent</text:span><text:span text:style-name="T105"> to Israel </text:span><text:span text:style-name="T107">in the past</text:span><text:span text:style-name="T105"> </text:span><text:span text:style-name="T108">are also called </text:span><text:span text:style-name="T105">apostles.</text:span></text:p>
          <text:list>
            <text:list-item>
              <text:p text:style-name="P62">Otherwise, <text:span text:style-name="T109">how could we explain </text:span>why the blood <text:span text:style-name="T109">was only </text:span>required <text:span text:style-name="T109">of the prophets and not the apostles?</text:span></text:p>
            </text:list-item>
          </text:list>
        </text:list-item>
        <text:list-item>
          <text:p text:style-name="P63">If we respect the context<text:span text:style-name="T110">ual timeline </text:span><text:span text:style-name="T111">for when these apostles and prophets lived</text:span>, <text:span text:style-name="T110">which is given in verse 51,</text:span> there’s simply no way to defend this one using the “<text:span text:style-name="T112">traditional”</text:span> definition of <text:span text:style-name="T113">an </text:span>apostle.</text:p>
        </text:list-item>
      </text:list>
      <text:p text:style-name="P64"/>
      <text:p text:style-name="P64"/>
      <text:p text:style-name="P64"/>
      <text:p text:style-name="P65">If we think this dual phraseology is unique we would be mistaken.</text:p>
      <text:p text:style-name="P64"/>
      <table:table table:name="Table10" table:style-name="Table10">
        <table:table-column table:style-name="Table10.A"/>
        <table:table-row>
          <table:table-cell table:style-name="Table10.A1" office:value-type="string">
            <text:p text:style-name="P15">Ephesians 2:20</text:p>
            <text:p text:style-name="Table_20_Contents">And are built upon <text:span text:style-name="T114">the</text:span><text:span text:style-name="T32"> foundation</text:span> of <text:span text:style-name="T32">the apostles and prophets</text:span>, Jesus Christ himself being the chief corner stone <text:span text:style-name="T115">[</text:span><text:span text:style-name="T116">Heb 3:1</text:span><text:span text:style-name="T115">]</text:span>;</text:p>
          </table:table-cell>
        </table:table-row>
      </table:table>
      <text:list text:style-name="L6">
        <text:list-item>
          <text:p text:style-name="P66">If “<text:span text:style-name="T42">apostles</text:span>” and “<text:span text:style-name="T42">prophets</text:span>” were two separate groups, they would each <text:span text:style-name="T117">necessarily have to </text:span>be different layers of the foundation, but they are not.</text:p>
        </text:list-item>
        <text:list-item>
          <text:p text:style-name="P67">Moreover, in both the English and the Greek, the definite article “<text:span text:style-name="T42">the</text:span>” rules over <text:span text:style-name="T11">both</text:span> “apostles and prophets” which <text:span text:style-name="T118">is indisputable proof</text:span> that <text:span text:style-name="T11">both</text:span> words are being used to describe <text:span text:style-name="T11">one</text:span> group.</text:p>
        </text:list-item>
        <text:list-item>
          <text:p text:style-name="P68">Fun fact: Jesus is both an Apostle (<text:span text:style-name="T52">Heb 3:1</text:span>) and a Prophet (<text:span text:style-name="T52">Deu 18:15,18</text:span>, <text:span text:style-name="T52">Joh 7:40</text:span>).</text:p>
        </text:list-item>
      </text:list>
      <text:p text:style-name="P65"/>
      <text:p text:style-name="P65"/>
      <text:p text:style-name="P65"/>
      <table:table table:name="Table11" table:style-name="Table11">
        <table:table-column table:style-name="Table11.A"/>
        <table:table-row>
          <table:table-cell table:style-name="Table11.A1" office:value-type="string">
            <text:p text:style-name="P15">Revelation 18:20</text:p>
            <text:p text:style-name="Table_20_Contents">Rejoice over her, thou heaven, and ye <text:span text:style-name="T32">holy apostles and prophets</text:span>; for God hath avenged you on her.</text:p>
          </table:table-cell>
        </table:table-row>
      </table:table>
      <text:list text:style-name="L7">
        <text:list-item>
          <text:p text:style-name="P69"><text:soft-page-break/><text:span text:style-name="T119">If "apostles" were a separate, temporary group that ceased in the 1st century, it makes no sense for God to address them as the </text:span><text:span text:style-name="T120">ongoing</text:span><text:span text:style-name="T119">, </text:span><text:span text:style-name="T120">continuous</text:span><text:span text:style-name="T119"> targets of Babylon's historical wrath </text:span><text:span text:style-name="T120">right up to the end of the world</text:span><text:span text:style-name="T119">.</text:span></text:p>
        </text:list-item>
        <text:list-item>
          <text:p text:style-name="P70">Just like the “<text:span text:style-name="T42">the</text:span>” in the previous example, “<text:span text:style-name="T42">holy</text:span>” applies to <text:span text:style-name="T11">both</text:span>. Otherwise, how could we explain that only the apostles were holy?</text:p>
        </text:list-item>
      </text:list>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1"><text:span text:style-name="T121">Verses used to “prove” that </text:span><text:span text:style-name="T122">an </text:span><text:span text:style-name="T121">apostle necessarily had to see Christ</text:span></text:p>
      <text:p text:style-name="P64"/>
      <text:p text:style-name="P72">For a moment, let’s ignore the severe problems <text:span text:style-name="T123">(cherry picking, twisting, etc.) </text:span><text:span text:style-name="T124">that </text:span>this tradition<text:span text:style-name="T125">al definition</text:span> <text:span text:style-name="T124">introduces if we try to explain the verses we just looked at </text:span><text:span text:style-name="T126">with it</text:span><text:span text:style-name="T124">.</text:span></text:p>
      <text:p text:style-name="P64"/>
      <table:table table:name="Table6" table:style-name="Table6">
        <table:table-column table:style-name="Table6.A"/>
        <table:table-row>
          <table:table-cell table:style-name="Table6.A1" office:value-type="string">
            <text:p text:style-name="P15">1 Corinthians 15:7-8</text:p>
            <text:p text:style-name="Table_20_Contents"><text:span text:style-name="T33">7</text:span> After that, he was seen of James; then of <text:span text:style-name="T127">all</text:span> the apostles.</text:p>
            <text:p text:style-name="Table_20_Contents"><text:span text:style-name="T33">8</text:span> And last of all he was seen of me also, as of one born out of due time.</text:p>
          </table:table-cell>
        </table:table-row>
      </table:table>
      <text:list text:style-name="L8">
        <text:list-item>
          <text:p text:style-name="P73"><text:span text:style-name="T128">Paul</text:span> doesn’t even call himself an apostle <text:span text:style-name="T11">here</text:span> nor does he count himself among them (v7).</text:p>
        </text:list-item>
        <text:list-item>
          <text:p text:style-name="P74">We have to <text:span text:style-name="T129">pull</text:span> “last of all” <text:span text:style-name="T129">out of it’s context </text:span>to <text:span text:style-name="T129">make it </text:span>mean something it <text:span text:style-name="T129">does not in order to use this to prove anything it doesn’t say.</text:span></text:p>
          <text:list>
            <text:list-item>
              <text:p text:style-name="P75">The context (v5-7) clearly provides the list of people that Paul was the last of:</text:p>
              <text:list>
                <text:list-item>
                  <text:p text:style-name="P75">Cephas <text:span text:style-name="T130">(Simon Peter; one of the twelve)</text:span></text:p>
                </text:list-item>
                <text:list-item>
                  <text:p text:style-name="P75">The twelve</text:p>
                </text:list-item>
                <text:list-item>
                  <text:p text:style-name="P75">Above 500 brethern at once <text:span text:style-name="T131">(</text:span><text:span text:style-name="T132">not called apostles</text:span><text:span text:style-name="T131">)</text:span></text:p>
                </text:list-item>
                <text:list-item>
                  <text:p text:style-name="P75">James <text:span text:style-name="T130">(called an apostle elsewhere: </text:span><text:span text:style-name="T133">Gal 1:19</text:span><text:span text:style-name="T130">)</text:span></text:p>
                </text:list-item>
                <text:list-item>
                  <text:p text:style-name="P75"><text:span text:style-name="T11">all</text:span> the apostles</text:p>
                </text:list-item>
                <text:list-item>
                  <text:p text:style-name="P76">last of all (those listed), Paul</text:p>
                </text:list-item>
              </text:list>
            </text:list-item>
            <text:list-item>
              <text:p text:style-name="P75">Side note: all means all. “The twelve” were already listed so “all the apostles” is not a phrase that means “the twelve” <text:span text:style-name="T134">here.</text:span></text:p>
            </text:list-item>
          </text:list>
        </text:list-item>
        <text:list-item>
          <text:p text:style-name="P77">So, out of that list and knowing that they aren’t even all apostles that are listed, how can we get that Paul was the last of the apostles from that?</text:p>
        </text:list-item>
      </text:list>
      <text:p text:style-name="P78"/>
      <table:table table:name="Table7" table:style-name="Table7">
        <table:table-column table:style-name="Table7.A"/>
        <table:table-row>
          <table:table-cell table:style-name="Table7.A1" office:value-type="string">
            <text:p text:style-name="P15">Acts 1:21-22</text:p>
            <text:p text:style-name="Table_20_Contents"><text:span text:style-name="T33">21</text:span> Wherefore of these men which have companied with us all the time that the Lord Jesus went in and out among us,</text:p>
            <text:p text:style-name="Table_20_Contents"><text:span text:style-name="T33">22</text:span> Beginning from the baptism of John, unto that same day that he was taken up from us, <text:span text:style-name="T32">must one be ordained to be a witness with us of his resurrection</text:span>.</text:p>
          </table:table-cell>
        </table:table-row>
      </table:table>
      <text:list text:style-name="L9">
        <text:list-item>
          <text:p text:style-name="P79">As evidenced by many verses (some listed above) being one of “the twelve” <text:span text:style-name="T135">is</text:span><text:span text:style-name="T11"> not</text:span> a requirement to be called an apostle.</text:p>
        </text:list-item>
        <text:list-item>
          <text:p text:style-name="P80">Therefore, <text:span text:style-name="T136">these verses have</text:span> nothing to do with defining the <text:span text:style-name="T136">requirements for an</text:span> apostle.</text:p>
          <text:list>
            <text:list-item>
              <text:p text:style-name="P81">If it did, then seeing Jesus <text:span text:style-name="T11">before</text:span> he died was a requirement (v21 “<text:span text:style-name="T137">all</text:span><text:span text:style-name="T138"> the time”</text:span>).</text:p>
            </text:list-item>
          </text:list>
        </text:list-item>
        <text:list-item>
          <text:p text:style-name="P82">Instead, it defines the requirements for one of “the twelve”.</text:p>
        </text:list-item>
      </text:list>
      <text:p text:style-name="P83"><text:soft-page-break/></text:p>
      <table:table table:name="Table12" table:style-name="Table12">
        <table:table-column table:style-name="Table12.A"/>
        <table:table-row>
          <table:table-cell table:style-name="Table12.A1" office:value-type="string">
            <text:p text:style-name="P15">1 Corinthians 9:1-2</text:p>
            <text:p text:style-name="Table_20_Contents"><text:span text:style-name="T33">1</text:span> Am I not an apostle? am I not free? have I not seen Jesus Christ our Lord? are not ye my work in the Lord?</text:p>
            <text:p text:style-name="Table_20_Contents"><text:span text:style-name="T33">2</text:span> If I be not an apostle unto others, yet doubtless I am to you: for the seal of mine apostleship are ye in the Lord.</text:p>
          </table:table-cell>
        </table:table-row>
      </table:table>
      <text:p text:style-name="P84"/>
      <text:p text:style-name="P85">Paul is defending his personal authority against critics in Corinth who were personally attacking <text:span text:style-name="T11">him</text:span>. He is listing <text:span text:style-name="T11">his</text:span> unique, top-tier credentials, not a bare-minimum entry requirement. <text:span text:style-name="T139">The text doesn’t even imply that these are requirements for an apostle. </text:span><text:span text:style-name="T140">Therefore, a</text:span>ssuming that these are <text:span text:style-name="T140">also </text:span>qualifications to be an apostle is a logical fallacy known as <text:span text:style-name="T42">affirming the consequent</text:span>. </text:p>
      <text:p text:style-name="P39"/>
      <text:p text:style-name="P86">The fallacy takes this structural form:</text:p>
      <text:list text:style-name="L10">
        <text:list-item>
          <text:p text:style-name="P87">If P, then Q. (eg. If it's raining, the sidewalk is wet.)</text:p>
        </text:list-item>
        <text:list-item>
          <text:p text:style-name="P87">Q is true. (eg. The sidewalk is wet.)</text:p>
        </text:list-item>
        <text:list-item>
          <text:p text:style-name="P87">Therefore, P is true. (eg. Therefore, it is raining.)</text:p>
        </text:list-item>
      </text:list>
      <text:p text:style-name="P86">This argument is invalid because other factors could explain why the sidewalk is wet (eg. a sprinkler or a broken fire hydrant).</text:p>
      <text:p text:style-name="P88"><text:span text:style-name="T141">Likewise, just because Paul has these qualifications does not necessitate that every apostle needed to have these qualifications. </text:span><text:span text:style-name="T142">We have to </text:span><text:span text:style-name="T143">add to</text:span><text:span text:style-name="T142"> the word of God to make it say that.</text:span><text:span text:style-name="T141"> This is most easily </text:span><text:span text:style-name="T144">proven</text:span><text:span text:style-name="T141"> by the fact that “</text:span><text:span text:style-name="T145">are not ye my work in the Lord?</text:span><text:span text:style-name="T141">” </text:span><text:span text:style-name="T146">does not</text:span> apply to <text:span text:style-name="T11">all</text:span> apostles and “<text:span text:style-name="T42">am I not free?</text:span>” does not necessarily apply to <text:span text:style-name="T11">all</text:span> apostles.</text:p>
      <text:p text:style-name="P88"/>
      <text:p text:style-name="P89">If we say that this proves that to be apostle you must “have seen Jesus Christ our Lord” we necessarily cannot cherry pick which one applies <text:span text:style-name="T147">and which one doesn’t </text:span>– they <text:span text:style-name="T148">either all</text:span><text:span text:style-name="T149"> fit or they do not. </text:span><text:span text:style-name="T150">The same exact logic applies to </text:span><text:span text:style-name="T151">Mark 16:15-18</text:span><text:span text:style-name="T150">. If we say that verse 15 applies to all </text:span><text:span text:style-name="T152">disciples of Christ</text:span><text:span text:style-name="T150">, then the rest of </text:span><text:span text:style-name="T153">what Jesus said</text:span><text:span text:style-name="T150"> necessarily also </text:span><text:span text:style-name="T153">applies</text:span><text:span text:style-name="T150"> to all </text:span><text:span text:style-name="T152">disciples of Christ</text:span><text:span text:style-name="T150">. </text:span><text:span text:style-name="T153">Jesus didn’t separate the ideas </text:span><text:span text:style-name="T154">and neither should we</text:span><text:span text:style-name="T150">: they are all applied to the </text:span><text:span text:style-name="T155">same</text:span><text:span text:style-name="T150"> group. To do otherwise is textbook cherry picking.</text:span></text:p>
      <text:p text:style-name="P89"/>
      <text:p text:style-name="P39">Simple Example:</text:p>
      <text:p text:style-name="P39"/>
      <text:p text:style-name="P39">If a top-tier surgeon is defending his qualifications to a skeptical hospital board, he might say: "Am I not a world-class surgeon? Have I not won the Nobel Prize in Medicine?"</text:p>
      <text:p text:style-name="P39"/>
      <text:p text:style-name="P39">Does that mean that it is impossible to be a surgeon unless you win a Nobel Prize? No, <text:span text:style-name="T156">of course not.</text:span> The Nobel Prize is a unique, high-level validation of his personal status, not a baseline requirement for the entire medical profession. Paul saw Christ, which made his apostleship uniquely authoritative, but it doesn't change the baseline meaning of a "sent messenger."</text:p>
      <text:p text:style-name="P39"/>
      <text:p text:style-name="Horizontal_20_Line"/>
      <text:p text:style-name="P90">The <text:span text:style-name="T157">Millstone (</text:span><text:span text:style-name="T158">Jdg 9:53</text:span><text:span text:style-name="T157">)</text:span></text:p>
      <text:p text:style-name="P39"/>
      <table:table table:name="Table13" table:style-name="Table13">
        <table:table-column table:style-name="Table13.A"/>
        <table:table-row>
          <table:table-cell table:style-name="Table13.A1" office:value-type="string">
            <text:p text:style-name="P15">Ephesians 4:8-13</text:p>
            <text:p text:style-name="Table_20_Contents"><text:span text:style-name="T33">8</text:span> Wherefore he saith, When he ascended up on high, he led captivity captive, and gave gifts unto men.</text:p>
            <text:p text:style-name="Table_20_Contents"><text:span text:style-name="T33">9</text:span> (Now that he ascended, what is it but that he also descended first into the lower parts of the earth?</text:p>
            <text:p text:style-name="Table_20_Contents"><text:span text:style-name="T33">10</text:span> He that descended is the same also that ascended up far above all heavens, that he might fill all things.)</text:p>
            <text:p text:style-name="Table_20_Contents"><text:span text:style-name="T33">11</text:span> And <text:span text:style-name="T159">he gave some, apostles; and some, prophets; and some, evangelists; and some, pastors </text:span><text:span text:style-name="T160">and</text:span><text:span text:style-name="T159"> teachers</text:span>;</text:p>
            <text:p text:style-name="Table_20_Contents"><text:span text:style-name="T33">12</text:span> <text:span text:style-name="T32">For the perfecting of the saints, for the work of the ministry, for the edifying of the body of Christ</text:span>:</text:p>
            <text:p text:style-name="Table_20_Contents"><text:span text:style-name="T33">13</text:span> <text:span text:style-name="T101">Till</text:span> we all come in the unity of the faith, and of the knowledge of the Son of God, unto a perfect man, unto the measure of the stature of the fulness of Christ:</text:p>
          </table:table-cell>
        </table:table-row>
      </table:table>
      <text:list text:style-name="L11">
        <text:list-item>
          <text:p text:style-name="P91"><text:soft-page-break/>Side note: “pastors and teachers” is two descriptors for the same group of people, similar to what we reviewed above. <text:span text:style-name="T161">If they were two </text:span><text:span text:style-name="T162">separate groups it would read “</text:span><text:span text:style-name="T161">and some, </text:span><text:span text:style-name="T162">pastors; and </text:span><text:span text:style-name="T161">some, </text:span><text:span text:style-name="T162">teachers;”.</text:span></text:p>
        </text:list-item>
      </text:list>
      <text:p text:style-name="P39"/>
      <text:p text:style-name="P92">In <text:span text:style-name="T52">Ephesians 4:11</text:span>, the list of spiritual gifts cannot be split up without creating an irreconcilable contradiction in verse 13.</text:p>
      <text:p text:style-name="P92"/>
      <text:p text:style-name="P92">Verse 13 establishes a single, binding time frame for all of these gifts. It does not say some gifts are given until one time and the rest until another; it says all of them are given "till" we all come in the unity of the faith. To claim we need pastors and evangelists today, but not apostles, violates the simple grammar of the text.</text:p>
      <text:p text:style-name="P92"/>
      <text:p text:style-name="P92">Furthermore, <text:span text:style-name="T52">Romans 10:15</text:span><text:span text:style-name="T163">a</text:span> asks, "<text:span text:style-name="T42">And how shall they preach, except they be sent</text:span><text:span text:style-name="T33">G649</text:span><text:span text:style-name="T42">?</text:span>" The word <text:span text:style-name="T42">sent</text:span> is the very root of apostle. To say we do not need apostles today is to say no one needs to be sent by God to deliver His message anymore.</text:p>
      <text:p text:style-name="P92"/>
      <text:p text:style-name="P92">Has the "till" of verse 13 arrived? If we still need pastors and evangelists today, we cannot separate them into different dispensations. They are grouped together. If we say the office of the apostle has ended, we must logically conclude that the offices of evangelist and pastor have ended too.</text:p>
      <text:p text:style-name="P93"><text:span text:style-name="T164">Where does th</text:span><text:span text:style-name="T165">e traditional definition</text:span><text:span text:style-name="T164"> come from?</text:span></text:p>
      <text:p text:style-name="P94"/>
      <text:h text:style-name="P95" text:outline-level="2"><text:bookmark text:name="p-rc_25f6b70cd9c9231a-40"/>1. The Protestant Reformation (16th Century) </text:h>
      <text:p text:style-name="P96"><text:bookmark text:name="p-rc_25f6b70cd9c9231a-41"/>The primary catalyst for defining the apostolic office as temporary and strictly limited was <text:span text:style-name="T166">John Calvin</text:span> and his contemporaries. </text:p>
      <text:list text:style-name="L12">
        <text:list-item>
          <text:p text:style-name="P97"><text:span text:style-name="T166">The Catholic Polemic:</text:span> The Roman Catholic Church argued for its supreme authority based on <text:span text:style-name="T167">apostolic succession</text:span>—the claim that the Pope and bishops directly inherited the office, authority, and continuous mantle of the original apostles.</text:p>
        </text:list-item>
        <text:list-item>
          <text:p text:style-name="P97"><text:span text:style-name="T166">The Reformers' Counter-Argument:</text:span> To undermine Rome's claim to ongoing apostolic authority, Calvin argued in his <text:span text:style-name="T167">Institutes of the Christian Religion</text:span> that God established both <text:span text:style-name="T166">temporary (extraordinary)</text:span> and <text:span text:style-name="T166">permanent (ordinary)</text:span> offices. Apostles, prophets, and evangelists were categorized as extraordinary offices meant only for the initiation of the Gospel age.</text:p>
        </text:list-item>
        <text:list-item>
          <text:p text:style-name="P97">To prove that the office had ceased, Reformed theologians <text:span text:style-name="T11">isolated</text:span> specific narrative parameters in Scripture—such as Peter's localized criteria for replacing Judas in <text:span text:style-name="T52">Acts 1:21–22</text:span> and Paul’s rhetorical defense in <text:span text:style-name="T52">1 Corinthians 9:1</text:span>—and elevated them into universal, rigid systemic laws for the definition of the office itself.</text:p>
        </text:list-item>
      </text:list>
      <text:h text:style-name="P98" text:outline-level="2">2. Countering the "Enthusiasts"</text:h>
      <text:p text:style-name="P96">During the same era, the mainstream Reformers were fighting a two-front theological war. Beyond defending against Rome, they were also countering radical Reformation groups (often called "Enthusiasts" or radical Anabaptists) who claimed to receive fresh, direct, infallible revelations from God through contemporary apostolic or prophetic promptings.</text:p>
      <text:p text:style-name="P96"><text:bookmark text:name="p-rc_25f6b70cd9c9231a-42"/>By dogmatically declaring that an apostle <text:span text:style-name="T167">must</text:span> be a physical eyewitness to the resurrection, the Reformers built a theological firewall: if there are no living eyewitnesses to the resurrection, then there are no contemporary apostles, and consequently, no new authoritative text or revelation can be given outside the written canon. </text:p>
      <text:h text:style-name="P98" text:outline-level="2">3. Post-Reformation Scholasticism and Princeton Theology (19th–20th Century)</text:h>
      <text:p text:style-name="P96">The tradition reached its modern, ultra-rigid formulation through Post-Reformation dogmatics and, most notably, the Princetonean theologians like <text:span text:style-name="T166">B.B. Warfield</text:span> (particularly in his 1918 work, <text:span text:style-name="T167">Counterfeit Miracles</text:span>).</text:p>
      <text:list text:style-name="L13">
        <text:list-item>
          <text:p text:style-name="P99"><text:soft-page-break/><text:span text:style-name="T166">The Mechanistic Closure:</text:span> Warfield and his contemporaries sought a logical, airtight argument against both Roman Catholic miracle claims and the early emergence of modern pentecostal/charismatic movements.</text:p>
        </text:list-item>
        <text:list-item>
          <text:p text:style-name="P99"><text:span text:style-name="T166">The "Apostles Only" Conundrum:</text:span> They formulated the argument that miraculous "sign gifts" were uniquely tied to the corporate office of the Apostle to authenticate the initial delivery of the New Covenant. They argued that only the original apostles had the power to transmit these capabilities to others. Therefore, once the last person who had personally seen the risen Christ died, the office ended, the supernatural authentication ceased, and the canon was complete.</text:p>
        </text:list-item>
      </text:list>
      <text:p text:style-name="P100"/>
      <text:p text:style-name="P101"><text:span text:style-name="T166">Summary of Origin:</text:span> The tradition was forged as a <text:span text:style-name="T166">theological defense mechanism</text:span>. It was built by 16th-century Reformers to strip the Papacy of its "apostolic" claims and to silence radical groups claiming new revelation. It was later solidified into a definitive, systematic rule by 19th-century cessationist theologians looking to establish a clean, historical boundary line at the end of the 1st century.</text:p>
      <text:p text:style-name="P102"><text:span text:style-name="T168"/></text:p>
      <text:p text:style-name="P103"/>
      <text:p text:style-name="P103"/>
      <table:table table:name="Table2" table:style-name="Table2">
        <table:table-column table:style-name="Table2.A"/>
        <table:table-row>
          <table:table-cell table:style-name="Table2.A1" office:value-type="string">
            <text:p text:style-name="P104">Revelation 2:1-3</text:p>
            <text:p text:style-name="P105"><text:span text:style-name="T33">1</text:span> <text:span text:style-name="T101">Unto the angel of the church of Ephesus write; These things saith he that holdeth the seven stars in his right hand, who walketh in the midst of the seven golden candlesticks;</text:span></text:p>
            <text:p text:style-name="P105"><text:span text:style-name="T33">2</text:span> <text:span text:style-name="T101">I know thy works, and thy labour, and thy patience, and how thou canst not bear them which are evil: and </text:span><text:span text:style-name="T169">thou hast tried them which say they are apostles, and are not, and hast found them liars</text:span><text:span text:style-name="T101">:</text:span></text:p>
            <text:p text:style-name="P105"><text:span text:style-name="T33">3</text:span> <text:span text:style-name="T101">And hast borne, and hast patience, and for my name's sake hast laboured, and hast not fainted.</text:span></text:p>
          </table:table-cell>
        </table:table-row>
      </table:table>
      <text:p text:style-name="P10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urce Han Serif SC" style:font-family-asian="'Source Han Serif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ccccc" draw:fill-hatch-solid="false" draw:fill-image-width="9.4098in" draw:fill-image-height="9.4098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cccccc" draw:fill-hatch-solid="false" draw:fill-image-width="9.4098in" draw:fill-image-height="9.4098in" style:repeat="repeat"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1T13:29:27.993245069</meta:creation-date>
    <dc:title>default</dc:title>
    <meta:editing-duration>PT12H13M16S</meta:editing-duration>
    <meta:editing-cycles>384</meta:editing-cycles>
    <meta:generator>LibreOffice/26.2.4.2$Linux_X86_64 LibreOffice_project/64a984c51f4702dbd3710b13428c673a2f1292e7</meta:generator>
    <dc:date>2026-07-13T12:23:40.383781684</dc:date>
    <meta:document-statistic meta:table-count="14" meta:image-count="0" meta:object-count="0" meta:page-count="9" meta:paragraph-count="174" meta:word-count="3469" meta:character-count="19913" meta:non-whitespace-character-count="16680"/>
    <meta:template xlink:type="simple" xlink:actuate="onRequest" xlink:title="default" xlink:href="../../../../Templates/default.ott" meta:date="2026-07-11T13:29:25.811605187"/>
  </office:meta>
</office:document-meta>
</file>