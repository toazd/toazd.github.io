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automatic-styles>
    <style:style style:name="Table19" style:family="table">
      <style:table-properties style:width="5.9194in" table:align="center"/>
    </style:style>
    <style:style style:name="Table19.A" style:family="table-column">
      <style:table-column-properties style:column-width="4.7181in"/>
    </style:style>
    <style:style style:name="Table19.B" style:family="table-column">
      <style:table-column-properties style:column-width="1.2014in"/>
    </style:style>
    <style:style style:name="Table19.A1" style:family="table-cell">
      <style:table-cell-properties fo:padding="0.0382in" fo:border="none"/>
    </style:style>
    <style:style style:name="Table26" style:family="table">
      <style:table-properties style:width="8in" table:align="margins"/>
    </style:style>
    <style:style style:name="Table26.A" style:family="table-column">
      <style:table-column-properties style:column-width="8in" style:rel-column-width="65535*"/>
    </style:style>
    <style:style style:name="Table26.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20" style:family="table">
      <style:table-properties style:width="8in" table:align="margins"/>
    </style:style>
    <style:style style:name="Table20.A" style:family="table-column">
      <style:table-column-properties style:column-width="8in" style:rel-column-width="65535*"/>
    </style:style>
    <style:style style:name="Table20.A1" style:family="table-cell">
      <style:table-cell-properties fo:padding="0.0382in" fo:border="0.5pt solid #000000"/>
    </style:style>
    <style:style style:name="Table9" style:family="table">
      <style:table-properties style:width="8in" table:align="margins"/>
    </style:style>
    <style:style style:name="Table9.A" style:family="table-column">
      <style:table-column-properties style:column-width="8in" style:rel-column-width="65535*"/>
    </style:style>
    <style:style style:name="Table9.A1" style:family="table-cell">
      <style:table-cell-properties fo:padding="0.0382in" fo:border="0.5pt solid #000000"/>
    </style:style>
    <style:style style:name="Table15" style:family="table">
      <style:table-properties style:width="7.9951in" table:align="left"/>
    </style:style>
    <style:style style:name="Table15.A" style:family="table-column">
      <style:table-column-properties style:column-width="3.7111in"/>
    </style:style>
    <style:style style:name="Table15.B" style:family="table-column">
      <style:table-column-properties style:column-width="4.284in"/>
    </style:style>
    <style:style style:name="Table15.A1" style:family="table-cell">
      <style:table-cell-properties fo:padding="0.0299in" fo:border-left="0.5pt solid #000000" fo:border-right="none" fo:border-top="0.5pt solid #000000" fo:border-bottom="0.5pt solid #000000"/>
    </style:style>
    <style:style style:name="Table15.B1" style:family="table-cell">
      <style:table-cell-properties fo:padding="0.0299in" fo:border="0.5pt solid #000000"/>
    </style:style>
    <style:style style:name="Table15.A2" style:family="table-cell">
      <style:table-cell-properties style:vertical-align="middle" fo:padding="0.0299in" fo:border-left="0.5pt solid #000000" fo:border-right="none" fo:border-top="none" fo:border-bottom="0.5pt solid #000000"/>
    </style:style>
    <style:style style:name="Table15.B2" style:family="table-cell">
      <style:table-cell-properties style:vertical-align="middle" fo:padding="0.0299in" fo:border-left="0.5pt solid #000000" fo:border-right="0.5pt solid #000000" fo:border-top="none" fo:border-bottom="0.5pt solid #000000"/>
    </style:style>
    <style:style style:name="Table15.10" style:family="table-row">
      <style:table-row-properties style:min-row-height="0.4958in"/>
    </style:style>
    <style:style style:name="Table8" style:family="table">
      <style:table-properties style:width="8in" table:align="margins"/>
    </style:style>
    <style:style style:name="Table8.A" style:family="table-column">
      <style:table-column-properties style:column-width="8in" style:rel-column-width="65535*"/>
    </style:style>
    <style:style style:name="Table8.A1" style:family="table-cell">
      <style:table-cell-properties fo:padding="0.0201in" fo:border="0.5pt solid #000000"/>
    </style:style>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Table14" style:family="table">
      <style:table-properties style:width="8in" table:align="margins"/>
    </style:style>
    <style:style style:name="Table14.A" style:family="table-column">
      <style:table-column-properties style:column-width="4in" style:rel-column-width="32767*"/>
    </style:style>
    <style:style style:name="Table14.B" style:family="table-column">
      <style:table-column-properties style:column-width="4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style:vertical-align="middle"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8in" table:align="margins"/>
    </style:style>
    <style:style style:name="Table5.A" style:family="table-column">
      <style:table-column-properties style:column-width="8in" style:rel-column-width="65535*"/>
    </style:style>
    <style:style style:name="Table5.A1" style:family="table-cell">
      <style:table-cell-properties fo:padding="0.0382in" fo:border="0.5pt solid #000000"/>
    </style:style>
    <style:style style:name="Table16" style:family="table">
      <style:table-properties style:width="8in" table:align="margins"/>
    </style:style>
    <style:style style:name="Table16.A" style:family="table-column">
      <style:table-column-properties style:column-width="8in" style:rel-column-width="65535*"/>
    </style:style>
    <style:style style:name="Table16.A1" style:family="table-cell">
      <style:table-cell-properties fo:padding="0.0382in" fo:border="0.5pt solid #000000"/>
    </style:style>
    <style:style style:name="Table17" style:family="table">
      <style:table-properties style:width="8in" table:align="margins"/>
    </style:style>
    <style:style style:name="Table17.A" style:family="table-column">
      <style:table-column-properties style:column-width="1.2083in" style:rel-column-width="9898*"/>
    </style:style>
    <style:style style:name="Table17.B" style:family="table-column">
      <style:table-column-properties style:column-width="2.3125in" style:rel-column-width="18943*"/>
    </style:style>
    <style:style style:name="Table17.C" style:family="table-column">
      <style:table-column-properties style:column-width="2.5in" style:rel-column-width="20479*"/>
    </style:style>
    <style:style style:name="Table17.D" style:family="table-column">
      <style:table-column-properties style:column-width="1.9792in" style:rel-column-width="16215*"/>
    </style:style>
    <style:style style:name="Table17.A1" style:family="table-cell">
      <style:table-cell-properties style:vertical-align="middle" fo:padding="0.0201in" fo:border-left="0.5pt solid #000000" fo:border-right="none" fo:border-top="0.5pt solid #000000" fo:border-bottom="0.5pt solid #000000"/>
    </style:style>
    <style:style style:name="Table17.D1" style:family="table-cell">
      <style:table-cell-properties style:vertical-align="middle" fo:padding="0.0201in" fo:border="0.5pt solid #000000"/>
    </style:style>
    <style:style style:name="Table17.A2" style:family="table-cell">
      <style:table-cell-properties style:vertical-align="middle" fo:padding="0.0201in" fo:border-left="0.5pt solid #000000" fo:border-right="none" fo:border-top="none" fo:border-bottom="0.5pt solid #000000"/>
    </style:style>
    <style:style style:name="Table17.D2" style:family="table-cell">
      <style:table-cell-properties style:vertical-align="middle" fo:padding="0.0201in" fo:border-left="0.5pt solid #000000" fo:border-right="0.5pt solid #000000" fo:border-top="none" fo:border-bottom="0.5pt solid #000000"/>
    </style:style>
    <style:style style:name="Table11" style:family="table">
      <style:table-properties style:width="8in" table:align="margins"/>
    </style:style>
    <style:style style:name="Table11.A" style:family="table-column">
      <style:table-column-properties style:column-width="8in" style:rel-column-width="65535*"/>
    </style:style>
    <style:style style:name="Table11.A1" style:family="table-cell">
      <style:table-cell-properties fo:padding="0.0382in" fo:border="0.5pt solid #000000"/>
    </style:style>
    <style:style style:name="Table10" style:family="table">
      <style:table-properties style:width="8in" table:align="margins"/>
    </style:style>
    <style:style style:name="Table10.A" style:family="table-column">
      <style:table-column-properties style:column-width="8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3" style:family="table">
      <style:table-properties style:width="8in" table:align="margins"/>
    </style:style>
    <style:style style:name="Table13.A" style:family="table-column">
      <style:table-column-properties style:column-width="8in" style:rel-column-width="65535*"/>
    </style:style>
    <style:style style:name="Table13.A1" style:family="table-cell">
      <style:table-cell-properties fo:padding="0.0382in" fo:border="0.5pt solid #000000"/>
    </style:style>
    <style:style style:name="Table6" style:family="table">
      <style:table-properties style:width="8in" table:align="margins"/>
    </style:style>
    <style:style style:name="Table6.A" style:family="table-column">
      <style:table-column-properties style:column-width="8in" style:rel-column-width="65535*"/>
    </style:style>
    <style:style style:name="Table6.A1" style:family="table-cell">
      <style:table-cell-properties fo:padding="0.0382in" fo:border="0.5pt solid #000000"/>
    </style:style>
    <style:style style:name="Table7" style:family="table">
      <style:table-properties style:width="8in" table:align="margins"/>
    </style:style>
    <style:style style:name="Table7.A" style:family="table-column">
      <style:table-column-properties style:column-width="8in" style:rel-column-width="65535*"/>
    </style:style>
    <style:style style:name="Table7.A1" style:family="table-cell">
      <style:table-cell-properties fo:padding="0.0382in" fo:border="0.5pt solid #000000"/>
    </style:style>
    <style:style style:name="Table12" style:family="table">
      <style:table-properties style:width="8in" table:align="margins"/>
    </style:style>
    <style:style style:name="Table12.A" style:family="table-column">
      <style:table-column-properties style:column-width="8in" style:rel-column-width="65535*"/>
    </style:style>
    <style:style style:name="Table12.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27" style:family="table">
      <style:table-properties style:width="8in" table:align="margins"/>
    </style:style>
    <style:style style:name="Table27.A" style:family="table-column">
      <style:table-column-properties style:column-width="8in" style:rel-column-width="65535*"/>
    </style:style>
    <style:style style:name="Table27.A1" style:family="table-cell">
      <style:table-cell-properties fo:padding="0.0382in" fo:border="0.5pt solid #000000"/>
    </style:style>
    <style:style style:name="P1" style:family="paragraph" style:parent-style-name="Heading_20_2">
      <style:paragraph-properties fo:text-align="center" style:justify-single-word="false"/>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officeooo:paragraph-rsid="0574e40c"/>
    </style:style>
    <style:style style:name="P4" style:family="paragraph" style:parent-style-name="Quotations">
      <style:text-properties fo:font-style="italic"/>
    </style:style>
    <style:style style:name="P5" style:family="paragraph" style:parent-style-name="Standard">
      <style:paragraph-properties fo:text-align="left" style:justify-single-word="false"/>
      <style:text-properties style:font-name="Liberation Sans" fo:font-size="12pt" officeooo:paragraph-rsid="0341ea94" style:font-size-asian="12pt" style:font-size-complex="12pt"/>
    </style:style>
    <style:style style:name="P6" style:family="paragraph" style:parent-style-name="Table_20_Contents">
      <style:paragraph-properties fo:text-align="center" style:justify-single-word="false"/>
      <style:text-properties fo:font-weight="bold" officeooo:rsid="043a900f" officeooo:paragraph-rsid="043a900f" style:font-weight-asian="bold" style:font-weight-complex="bold"/>
    </style:style>
    <style:style style:name="P7" style:family="paragraph" style:parent-style-name="Table_20_Contents">
      <style:text-properties officeooo:rsid="043ac84d" officeooo:paragraph-rsid="043ac84d"/>
    </style:style>
    <style:style style:name="P8" style:family="paragraph" style:parent-style-name="Table_20_Contents">
      <style:paragraph-properties fo:text-align="left" style:justify-single-word="false"/>
      <style:text-properties officeooo:rsid="043a900f" officeooo:paragraph-rsid="043a900f"/>
    </style:style>
    <style:style style:name="P9" style:family="paragraph" style:parent-style-name="Table_20_Contents">
      <style:paragraph-properties fo:text-align="left" style:justify-single-word="false"/>
      <style:text-properties officeooo:rsid="043ac84d" officeooo:paragraph-rsid="043ac84d"/>
    </style:style>
    <style:style style:name="P10" style:family="paragraph" style:parent-style-name="Table_20_Contents">
      <style:text-properties officeooo:rsid="043c7a12" officeooo:paragraph-rsid="043c7a12"/>
    </style:style>
    <style:style style:name="P11" style:family="paragraph" style:parent-style-name="Table_20_Contents">
      <style:paragraph-properties fo:text-align="left" style:justify-single-word="false"/>
      <style:text-properties officeooo:rsid="043c7a12" officeooo:paragraph-rsid="043c7a12"/>
    </style:style>
    <style:style style:name="P12" style:family="paragraph" style:parent-style-name="Table_20_Contents">
      <style:text-properties officeooo:rsid="048475a1" officeooo:paragraph-rsid="048475a1"/>
    </style:style>
    <style:style style:name="P13" style:family="paragraph" style:parent-style-name="Table_20_Contents">
      <style:paragraph-properties fo:text-align="left" style:justify-single-word="false"/>
      <style:text-properties officeooo:rsid="048475a1" officeooo:paragraph-rsid="048475a1"/>
    </style:style>
    <style:style style:name="P14" style:family="paragraph" style:parent-style-name="Table_20_Contents">
      <style:text-properties officeooo:rsid="056b9393" officeooo:paragraph-rsid="056b9393"/>
    </style:style>
    <style:style style:name="P15" style:family="paragraph" style:parent-style-name="Table_20_Contents">
      <style:paragraph-properties fo:text-align="left" style:justify-single-word="false"/>
      <style:text-properties officeooo:rsid="056d2c8f" officeooo:paragraph-rsid="056d2c8f"/>
    </style:style>
    <style:style style:name="P16" style:family="paragraph" style:parent-style-name="Table_20_Contents">
      <style:text-properties officeooo:rsid="048633fa" officeooo:paragraph-rsid="048633fa"/>
    </style:style>
    <style:style style:name="P17" style:family="paragraph" style:parent-style-name="Table_20_Contents">
      <style:paragraph-properties fo:text-align="left" style:justify-single-word="false"/>
      <style:text-properties officeooo:rsid="048633fa" officeooo:paragraph-rsid="048633fa"/>
    </style:style>
    <style:style style:name="P18" style:family="paragraph" style:parent-style-name="Table_20_Contents">
      <style:text-properties officeooo:rsid="04a01989" officeooo:paragraph-rsid="04a01989"/>
    </style:style>
    <style:style style:name="P19" style:family="paragraph" style:parent-style-name="Table_20_Contents">
      <style:paragraph-properties fo:text-align="left" style:justify-single-word="false"/>
      <style:text-properties officeooo:rsid="04a01989" officeooo:paragraph-rsid="04a01989"/>
    </style:style>
    <style:style style:name="P20" style:family="paragraph" style:parent-style-name="Table_20_Contents">
      <style:text-properties officeooo:rsid="052596f7" officeooo:paragraph-rsid="052596f7"/>
    </style:style>
    <style:style style:name="P21" style:family="paragraph" style:parent-style-name="Table_20_Contents">
      <style:paragraph-properties fo:text-align="left" style:justify-single-word="false"/>
      <style:text-properties officeooo:rsid="052596f7" officeooo:paragraph-rsid="052596f7"/>
    </style:style>
    <style:style style:name="P22" style:family="paragraph" style:parent-style-name="Table_20_Contents">
      <style:paragraph-properties fo:text-align="left" style:justify-single-word="false"/>
      <style:text-properties officeooo:rsid="05278192" officeooo:paragraph-rsid="05278192"/>
    </style:style>
    <style:style style:name="P23" style:family="paragraph" style:parent-style-name="Table_20_Contents">
      <style:paragraph-properties fo:text-align="left" style:justify-single-word="false"/>
      <style:text-properties officeooo:rsid="05282173" officeooo:paragraph-rsid="05282173"/>
    </style:style>
    <style:style style:name="P24" style:family="paragraph" style:parent-style-name="Table_20_Contents">
      <style:paragraph-properties fo:text-align="left" style:justify-single-word="false"/>
      <style:text-properties officeooo:rsid="052883f9" officeooo:paragraph-rsid="052883f9"/>
    </style:style>
    <style:style style:name="P25" style:family="paragraph" style:parent-style-name="Table_20_Contents">
      <style:paragraph-properties fo:text-align="left" style:justify-single-word="false"/>
      <style:text-properties officeooo:rsid="05296366" officeooo:paragraph-rsid="05296366"/>
    </style:style>
    <style:style style:name="P26" style:family="paragraph" style:parent-style-name="Table_20_Contents">
      <style:paragraph-properties fo:text-align="left" style:justify-single-word="false"/>
      <style:text-properties officeooo:rsid="052b6278" officeooo:paragraph-rsid="052b6278"/>
    </style:style>
    <style:style style:name="P27" style:family="paragraph" style:parent-style-name="Standard">
      <style:paragraph-properties fo:text-align="center" style:justify-single-word="false"/>
      <style:text-properties style:font-name="Liberation Serif" fo:font-size="14pt" fo:font-weight="normal" officeooo:rsid="023c8b84" officeooo:paragraph-rsid="023c8b84" style:font-size-asian="14pt" style:font-weight-asian="normal" style:font-size-complex="14pt" style:font-weight-complex="normal"/>
    </style:style>
    <style:style style:name="P28" style:family="paragraph" style:parent-style-name="Table_20_Contents">
      <style:text-properties fo:font-weight="bold" style:font-weight-asian="bold" style:font-weight-complex="bold"/>
    </style:style>
    <style:style style:name="P29" style:family="paragraph" style:parent-style-name="Standard">
      <style:paragraph-properties fo:text-align="center" style:justify-single-word="false"/>
      <style:text-properties style:font-name="Liberation Serif" fo:font-size="14pt" officeooo:rsid="023c8b84" officeooo:paragraph-rsid="023c8b84" style:font-size-asian="14pt" style:font-size-complex="14pt"/>
    </style:style>
    <style:style style:name="P30" style:family="paragraph" style:parent-style-name="Standard">
      <style:text-properties officeooo:paragraph-rsid="001d3809"/>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050d981"/>
    </style:style>
    <style:style style:name="P33" style:family="paragraph" style:parent-style-name="Standard">
      <style:text-properties officeooo:rsid="001d3809" officeooo:paragraph-rsid="013eabe8"/>
    </style:style>
    <style:style style:name="P34" style:family="paragraph" style:parent-style-name="Standard">
      <style:text-properties officeooo:paragraph-rsid="056f5669"/>
    </style:style>
    <style:style style:name="P35" style:family="paragraph" style:parent-style-name="Standard">
      <style:text-properties officeooo:paragraph-rsid="01440474"/>
    </style:style>
    <style:style style:name="P36" style:family="paragraph" style:parent-style-name="Standard">
      <style:text-properties style:font-name="Liberation Sans" fo:font-size="12pt" officeooo:paragraph-rsid="023e7e65" style:font-size-asian="12pt" style:font-size-complex="12pt"/>
    </style:style>
    <style:style style:name="P37" style:family="paragraph" style:parent-style-name="Heading_20_2">
      <style:paragraph-properties fo:line-height="100%"/>
      <style:text-properties style:font-name="Liberation Sans" fo:font-size="12pt" officeooo:paragraph-rsid="023e7e65" style:font-size-asian="12pt" style:font-size-complex="12pt"/>
    </style:style>
    <style:style style:name="P38" style:family="paragraph" style:parent-style-name="Text_20_body">
      <style:paragraph-properties fo:margin-left="0in" fo:margin-right="0in" fo:margin-top="0in" fo:margin-bottom="0.0972in" style:contextual-spacing="false" fo:line-height="100%" fo:text-indent="0in" style:auto-text-indent="false"/>
      <style:text-properties style:font-name="Liberation Sans" fo:font-size="12pt" officeooo:paragraph-rsid="023e7e65" style:font-size-asian="12pt" style:font-size-complex="12pt"/>
    </style:style>
    <style:style style:name="P39" style:family="paragraph" style:parent-style-name="Text_20_body" style:list-style-name="L2">
      <style:paragraph-properties fo:margin-left="0in" fo:margin-right="0in" fo:margin-top="0in" fo:margin-bottom="0.0972in" style:contextual-spacing="false" fo:line-height="100%" fo:text-indent="0in" style:auto-text-indent="false" fo:padding="0in" fo:border="none"/>
      <style:text-properties style:font-name="Liberation Sans" fo:font-size="12pt" officeooo:paragraph-rsid="023e7e65" style:font-size-asian="12pt" style:font-size-complex="12pt"/>
    </style:style>
    <style:style style:name="P40" style:family="paragraph" style:parent-style-name="Heading_20_2">
      <style:paragraph-properties fo:margin-left="0in" fo:margin-right="0in" fo:margin-top="0in" fo:margin-bottom="0.0972in" style:contextual-spacing="false" fo:line-height="100%" fo:text-indent="0in" style:auto-text-indent="false"/>
      <style:text-properties style:font-name="Liberation Sans" fo:font-size="12pt" officeooo:paragraph-rsid="023e7e65" style:font-size-asian="12pt" style:font-size-complex="12pt"/>
    </style:style>
    <style:style style:name="P41" style:family="paragraph" style:parent-style-name="Text_20_body" style:list-style-name="L3">
      <style:paragraph-properties fo:margin-left="0in" fo:margin-right="0in" fo:margin-top="0in" fo:margin-bottom="0.0972in" style:contextual-spacing="false" fo:line-height="100%" fo:text-indent="0in" style:auto-text-indent="false" fo:padding="0in" fo:border="none"/>
      <style:text-properties style:font-name="Liberation Sans" fo:font-size="12pt" officeooo:paragraph-rsid="023e7e65" style:font-size-asian="12pt" style:font-size-complex="12pt"/>
    </style:style>
    <style:style style:name="P42" style:family="paragraph" style:parent-style-name="Standard">
      <style:paragraph-properties fo:text-align="center" style:justify-single-word="false"/>
      <style:text-properties officeooo:paragraph-rsid="0481ef19"/>
    </style:style>
    <style:style style:name="P43" style:family="paragraph" style:parent-style-name="Quotations">
      <style:text-properties officeooo:paragraph-rsid="032d3e30"/>
    </style:style>
    <style:style style:name="P44" style:family="paragraph" style:parent-style-name="Quotations">
      <style:text-properties fo:background-color="#ffff00"/>
    </style:style>
    <style:style style:name="P45" style:family="paragraph" style:parent-style-name="Quotations">
      <style:paragraph-properties style:writing-mode="lr-tb" style:writing-mode-automatic="false"/>
    </style:style>
    <style:style style:name="P46" style:family="paragraph" style:parent-style-name="Standard">
      <style:text-properties officeooo:rsid="04474e24" officeooo:paragraph-rsid="04474e24"/>
    </style:style>
    <style:style style:name="P47" style:family="paragraph" style:parent-style-name="Table_20_Contents">
      <style:text-properties fo:color="#127622" loext:opacity="100%"/>
    </style:style>
    <style:style style:name="P48" style:family="paragraph" style:parent-style-name="Table_20_Contents">
      <style:text-properties fo:background-color="transparent"/>
    </style:style>
    <style:style style:name="P49" style:family="paragraph" style:parent-style-name="Standard">
      <style:text-properties officeooo:rsid="04474e24" officeooo:paragraph-rsid="044a4ca8"/>
    </style:style>
    <style:style style:name="P50" style:family="paragraph" style:parent-style-name="Standard">
      <style:text-properties style:text-underline-style="none" fo:font-weight="bold" officeooo:rsid="044c19dd" officeooo:paragraph-rsid="044c19dd" style:font-weight-asian="bold" style:font-weight-complex="bold"/>
    </style:style>
    <style:style style:name="P51" style:family="paragraph" style:parent-style-name="Standard">
      <style:text-properties officeooo:rsid="044c19dd" officeooo:paragraph-rsid="044c19dd"/>
    </style:style>
    <style:style style:name="P52" style:family="paragraph" style:parent-style-name="Standard" style:list-style-name="L4">
      <style:text-properties officeooo:rsid="044c19dd" officeooo:paragraph-rsid="044c19dd"/>
    </style:style>
    <style:style style:name="P53" style:family="paragraph" style:parent-style-name="Quotations">
      <style:text-properties officeooo:rsid="044c19dd" officeooo:paragraph-rsid="044c19dd"/>
    </style:style>
    <style:style style:name="P54" style:family="paragraph" style:parent-style-name="Standard" style:list-style-name="L5">
      <style:text-properties officeooo:rsid="044c19dd" officeooo:paragraph-rsid="044c19dd"/>
    </style:style>
    <style:style style:name="P55" style:family="paragraph" style:parent-style-name="Standard" style:list-style-name="L6">
      <style:text-properties officeooo:rsid="044c19dd" officeooo:paragraph-rsid="044c19dd"/>
    </style:style>
    <style:style style:name="P56" style:family="paragraph" style:parent-style-name="Quotations">
      <style:text-properties officeooo:rsid="044dbbe1" officeooo:paragraph-rsid="0473ce5d"/>
    </style:style>
    <style:style style:name="P57" style:family="paragraph" style:parent-style-name="Quotations">
      <style:text-properties officeooo:rsid="0471e952" officeooo:paragraph-rsid="0473ce5d"/>
    </style:style>
    <style:style style:name="P58" style:family="paragraph" style:parent-style-name="Standard">
      <style:text-properties officeooo:rsid="04500284" officeooo:paragraph-rsid="04500284"/>
    </style:style>
    <style:style style:name="P59" style:family="paragraph" style:parent-style-name="Standard">
      <style:text-properties officeooo:paragraph-rsid="0450e71d"/>
    </style:style>
    <style:style style:name="P60" style:family="paragraph" style:parent-style-name="Standard">
      <style:text-properties officeooo:paragraph-rsid="047a7346"/>
    </style:style>
    <style:style style:name="P61" style:family="paragraph" style:parent-style-name="Standard">
      <style:text-properties fo:color="#127622" loext:opacity="100%"/>
    </style:style>
    <style:style style:name="P62" style:family="paragraph" style:parent-style-name="Standard">
      <style:text-properties style:font-name="Liberation Sans" fo:font-size="12pt" style:font-size-asian="12pt" style:font-size-complex="12pt"/>
    </style:style>
    <style:style style:name="P63" style:family="paragraph" style:parent-style-name="Standard">
      <style:text-properties style:font-name="Liberation Sans" fo:font-size="12pt" fo:font-weight="bold" style:font-size-asian="12pt" style:font-size-complex="12pt"/>
    </style:style>
    <style:style style:name="P64" style:family="paragraph" style:parent-style-name="Heading_20_2">
      <style:paragraph-properties fo:text-align="center" style:justify-single-word="false"/>
      <style:text-properties officeooo:rsid="0533903d" officeooo:paragraph-rsid="0533903d"/>
    </style:style>
    <style:style style:name="P65" style:family="paragraph" style:parent-style-name="Standard" style:list-style-name="L7"/>
    <style:style style:name="P66" style:family="paragraph" style:parent-style-name="Standard">
      <style:paragraph-properties fo:text-align="center" style:justify-single-word="false"/>
    </style:style>
    <style:style style:name="P67" style:family="paragraph" style:parent-style-name="Text_20_body" style:list-style-name="L8"/>
    <style:style style:name="P68" style:family="paragraph" style:parent-style-name="Text_20_body" style:list-style-name="L9"/>
    <style:style style:name="P69" style:family="paragraph" style:parent-style-name="Heading_20_4">
      <style:text-properties style:font-name="Liberation Sans1" fo:font-weight="bold"/>
    </style:style>
    <style:style style:name="P70" style:family="paragraph" style:parent-style-name="Quotations" style:list-style-name="L10">
      <style:paragraph-properties fo:margin-top="0in" fo:margin-bottom="0.1965in" style:contextual-spacing="false"/>
      <style:text-properties fo:font-style="italic"/>
    </style:style>
    <style:style style:name="P71" style:family="paragraph" style:parent-style-name="Text_20_body" style:list-style-name="L10"/>
    <style:style style:name="P72" style:family="paragraph" style:parent-style-name="Text_20_body">
      <style:text-properties fo:font-weight="normal" style:font-weight-asian="normal" style:font-weight-complex="normal"/>
    </style:style>
    <style:style style:name="P73" style:family="paragraph" style:parent-style-name="Quotations" style:list-style-name="L11">
      <style:paragraph-properties fo:margin-top="0in" fo:margin-bottom="0.1965in" style:contextual-spacing="false"/>
      <style:text-properties fo:font-style="italic"/>
    </style:style>
    <style:style style:name="P74" style:family="paragraph" style:parent-style-name="Text_20_body" style:list-style-name="L11"/>
    <style:style style:name="P75" style:family="paragraph" style:parent-style-name="Heading_20_4">
      <style:paragraph-properties style:writing-mode="lr-tb" style:writing-mode-automatic="false"/>
      <style:text-properties style:font-name="Liberation Sans1" fo:font-weight="bold"/>
    </style:style>
    <style:style style:name="P76" style:family="paragraph" style:parent-style-name="Quotations">
      <style:paragraph-properties fo:margin-top="0in" fo:margin-bottom="0.1965in" style:contextual-spacing="false"/>
      <style:text-properties fo:font-style="italic"/>
    </style:style>
    <style:style style:name="P77" style:family="paragraph" style:parent-style-name="Text_20_body" style:list-style-name="L12"/>
    <style:style style:name="P78" style:family="paragraph" style:parent-style-name="Text_20_body" style:list-style-name="L13"/>
    <style:style style:name="P79" style:family="paragraph" style:parent-style-name="Standard">
      <style:text-properties officeooo:paragraph-rsid="0555013d"/>
    </style:style>
    <style:style style:name="P80" style:family="paragraph" style:parent-style-name="Table_20_Contents">
      <style:paragraph-properties fo:text-align="center" style:justify-single-word="false"/>
      <style:text-properties fo:font-weight="bold" officeooo:rsid="01c87223" officeooo:paragraph-rsid="03c1a8bd" style:font-weight-asian="bold" style:font-weight-complex="bold"/>
    </style:style>
    <style:style style:name="P81" style:family="paragraph" style:parent-style-name="Standard">
      <style:text-properties officeooo:rsid="01b42407" officeooo:paragraph-rsid="03c1a8bd"/>
    </style:style>
    <style:style style:name="P82" style:family="paragraph" style:parent-style-name="Standard">
      <style:text-properties officeooo:paragraph-rsid="049a3c9b"/>
    </style:style>
    <style:style style:name="P83" style:family="paragraph" style:parent-style-name="Standard">
      <style:text-properties officeooo:rsid="01b3d67f" officeooo:paragraph-rsid="03c1a8bd"/>
    </style:style>
    <style:style style:name="P84" style:family="paragraph" style:parent-style-name="Standard">
      <style:text-properties officeooo:rsid="0498e8ae" officeooo:paragraph-rsid="0498e8ae"/>
    </style:style>
    <style:style style:name="P85" style:family="paragraph" style:parent-style-name="Standard">
      <style:text-properties officeooo:rsid="01b88a4d" officeooo:paragraph-rsid="03c1a8bd"/>
    </style:style>
    <style:style style:name="P86" style:family="paragraph" style:parent-style-name="Standard">
      <style:text-properties officeooo:rsid="01c9f31c" officeooo:paragraph-rsid="03c1a8bd"/>
    </style:style>
    <style:style style:name="P87" style:family="paragraph" style:parent-style-name="Table_20_Contents">
      <style:text-properties officeooo:rsid="01c9f31c" officeooo:paragraph-rsid="03c1a8bd"/>
    </style:style>
    <style:style style:name="P88" style:family="paragraph" style:parent-style-name="Standard">
      <style:text-properties officeooo:rsid="01c1bdcf" officeooo:paragraph-rsid="03c1a8bd"/>
    </style:style>
    <style:style style:name="P89" style:family="paragraph" style:parent-style-name="Table_20_Contents">
      <style:text-properties officeooo:paragraph-rsid="03c1a8bd"/>
    </style:style>
    <style:style style:name="P90" style:family="paragraph" style:parent-style-name="Standard">
      <style:text-properties officeooo:rsid="01c29bc9" officeooo:paragraph-rsid="03c1a8bd"/>
    </style:style>
    <style:style style:name="P91" style:family="paragraph" style:parent-style-name="Standard">
      <style:text-properties officeooo:rsid="01c53063" officeooo:paragraph-rsid="03c1a8bd"/>
    </style:style>
    <style:style style:name="P92" style:family="paragraph" style:parent-style-name="Standard">
      <style:text-properties officeooo:paragraph-rsid="03c1a8bd"/>
    </style:style>
    <style:style style:name="P93" style:family="paragraph" style:parent-style-name="Standard">
      <style:text-properties officeooo:rsid="03bb1f1d" officeooo:paragraph-rsid="03c1a8bd"/>
    </style:style>
    <style:style style:name="P94" style:family="paragraph" style:parent-style-name="Standard">
      <style:text-properties officeooo:rsid="0455b8d8" officeooo:paragraph-rsid="0455b8d8"/>
    </style:style>
    <style:style style:name="P95" style:family="paragraph" style:parent-style-name="Standard">
      <style:text-properties officeooo:rsid="03bdc13d" officeooo:paragraph-rsid="03c1a8bd"/>
    </style:style>
    <style:style style:name="P96" style:family="paragraph" style:parent-style-name="Standard">
      <style:text-properties officeooo:rsid="03bf7bb2" officeooo:paragraph-rsid="03c1a8bd"/>
    </style:style>
    <style:style style:name="P97" style:family="paragraph" style:parent-style-name="Standard">
      <style:text-properties officeooo:rsid="01c6d9f4" officeooo:paragraph-rsid="03c1a8bd"/>
    </style:style>
    <style:style style:name="P98" style:family="paragraph" style:parent-style-name="Standard">
      <style:text-properties officeooo:rsid="01cbda78" officeooo:paragraph-rsid="03c1a8bd"/>
    </style:style>
    <style:style style:name="P99" style:family="paragraph" style:parent-style-name="Standard">
      <style:text-properties officeooo:rsid="01cd08f2" officeooo:paragraph-rsid="03c1a8bd"/>
    </style:style>
    <style:style style:name="P100" style:family="paragraph" style:parent-style-name="Standard">
      <style:text-properties officeooo:rsid="005c668d" officeooo:paragraph-rsid="03c1a8bd"/>
    </style:style>
    <style:style style:name="P101" style:family="paragraph" style:parent-style-name="Table_20_Contents">
      <style:text-properties officeooo:paragraph-rsid="0456a076"/>
    </style:style>
    <style:style style:name="P102" style:family="paragraph" style:parent-style-name="Table_20_Contents">
      <style:text-properties officeooo:paragraph-rsid="04448e77"/>
    </style:style>
    <style:style style:name="P103" style:family="paragraph" style:parent-style-name="Table_20_Contents" style:list-style-name="L14">
      <style:text-properties officeooo:paragraph-rsid="04448e77"/>
    </style:style>
    <style:style style:name="P104" style:family="paragraph" style:parent-style-name="Table_20_Contents" style:list-style-name="L14">
      <style:text-properties officeooo:rsid="00608121" officeooo:paragraph-rsid="04448e77"/>
    </style:style>
    <style:style style:name="P105" style:family="paragraph" style:parent-style-name="Standard">
      <style:text-properties officeooo:rsid="00ccf1de" officeooo:paragraph-rsid="04448e77"/>
    </style:style>
    <style:style style:name="P106" style:family="paragraph" style:parent-style-name="Standard">
      <style:paragraph-properties fo:text-align="center" style:justify-single-word="false"/>
      <style:text-properties style:font-name="Liberation Serif" fo:font-size="12pt" fo:font-weight="normal" officeooo:rsid="014d9292" officeooo:paragraph-rsid="014d9292" style:font-size-asian="12pt" style:font-weight-asian="normal" style:font-size-complex="12pt" style:font-weight-complex="normal"/>
    </style:style>
    <style:style style:name="P107" style:family="paragraph" style:parent-style-name="Table_20_Contents">
      <style:text-properties officeooo:paragraph-rsid="004df468"/>
    </style:style>
    <style:style style:name="P108" style:family="paragraph" style:parent-style-name="Standard">
      <style:text-properties officeooo:paragraph-rsid="0027835c"/>
    </style:style>
    <style:style style:name="P109" style:family="paragraph" style:parent-style-name="Standard" style:list-style-name="L15">
      <style:text-properties officeooo:paragraph-rsid="0027835c"/>
    </style:style>
    <style:style style:name="P110" style:family="paragraph" style:parent-style-name="Standard" style:list-style-name="L15">
      <style:text-properties fo:font-style="normal" officeooo:rsid="00293bc3" officeooo:paragraph-rsid="002cb797" style:font-style-asian="normal" style:font-style-complex="normal"/>
    </style:style>
    <style:style style:name="P111" style:family="paragraph" style:parent-style-name="Standard" style:list-style-name="L15">
      <style:text-properties fo:font-style="normal" officeooo:rsid="03d73dc8" officeooo:paragraph-rsid="03d73dc8" style:font-style-asian="normal" style:font-style-complex="normal"/>
    </style:style>
    <style:style style:name="P112" style:family="paragraph" style:parent-style-name="Standard">
      <style:text-properties officeooo:rsid="003388d3" officeooo:paragraph-rsid="01605f3d"/>
    </style:style>
    <style:style style:name="P113" style:family="paragraph" style:parent-style-name="Standard">
      <style:text-properties officeooo:rsid="0202012f" officeooo:paragraph-rsid="0202012f"/>
    </style:style>
    <style:style style:name="P114" style:family="paragraph" style:parent-style-name="Standard" style:list-style-name="L16">
      <style:text-properties officeooo:rsid="0202012f" officeooo:paragraph-rsid="0202012f"/>
    </style:style>
    <style:style style:name="P115" style:family="paragraph" style:parent-style-name="Standard" style:list-style-name="L15">
      <style:paragraph-properties style:writing-mode="lr-tb" style:writing-mode-automatic="false"/>
      <style:text-properties style:text-underline-style="none" officeooo:rsid="00356d4a" officeooo:paragraph-rsid="01605f3d"/>
    </style:style>
    <style:style style:name="P116" style:family="paragraph" style:parent-style-name="Standard" style:list-style-name="L15">
      <style:paragraph-properties style:writing-mode="lr-tb" style:writing-mode-automatic="false"/>
      <style:text-properties style:text-underline-style="none" officeooo:rsid="0160f5f4" officeooo:paragraph-rsid="0160f5f4"/>
    </style:style>
    <style:style style:name="P117" style:family="paragraph" style:parent-style-name="Standard" style:list-style-name="L15">
      <style:paragraph-properties style:writing-mode="lr-tb" style:writing-mode-automatic="false"/>
      <style:text-properties style:text-underline-style="none" officeooo:rsid="003388d3" officeooo:paragraph-rsid="01605f3d"/>
    </style:style>
    <style:style style:name="P118" style:family="paragraph" style:parent-style-name="Standard" style:list-style-name="L15">
      <style:paragraph-properties style:writing-mode="lr-tb" style:writing-mode-automatic="false"/>
      <style:text-properties style:text-underline-style="none" officeooo:rsid="01605f3d" officeooo:paragraph-rsid="01605f3d"/>
    </style:style>
    <style:style style:name="P119" style:family="paragraph" style:parent-style-name="Standard" style:list-style-name="L15">
      <style:paragraph-properties style:writing-mode="lr-tb" style:writing-mode-automatic="false"/>
      <style:text-properties style:text-underline-style="none" officeooo:rsid="01655c3e" officeooo:paragraph-rsid="01655c3e"/>
    </style:style>
    <style:style style:name="P120" style:family="paragraph" style:parent-style-name="Standard" style:list-style-name="L15">
      <style:paragraph-properties style:writing-mode="lr-tb" style:writing-mode-automatic="false"/>
      <style:text-properties style:text-underline-style="none" officeooo:rsid="01776333" officeooo:paragraph-rsid="01776333"/>
    </style:style>
    <style:style style:name="P121" style:family="paragraph" style:parent-style-name="Standard" style:list-style-name="L15">
      <style:paragraph-properties style:writing-mode="lr-tb" style:writing-mode-automatic="false"/>
      <style:text-properties style:text-underline-style="none" officeooo:rsid="0177902e" officeooo:paragraph-rsid="0177902e"/>
    </style:style>
    <style:style style:name="P122" style:family="paragraph" style:parent-style-name="Standard" style:list-style-name="L15">
      <style:paragraph-properties style:writing-mode="lr-tb" style:writing-mode-automatic="false"/>
      <style:text-properties style:text-underline-style="none" officeooo:rsid="0179660e" officeooo:paragraph-rsid="0179660e"/>
    </style:style>
    <style:style style:name="P123" style:family="paragraph" style:parent-style-name="Standard" style:list-style-name="L15">
      <style:paragraph-properties style:writing-mode="lr-tb" style:writing-mode-automatic="false"/>
      <style:text-properties style:text-underline-style="none" officeooo:rsid="017982c7" officeooo:paragraph-rsid="017982c7"/>
    </style:style>
    <style:style style:name="P124" style:family="paragraph" style:parent-style-name="Standard">
      <style:text-properties officeooo:rsid="001e578a" officeooo:paragraph-rsid="001e578a"/>
    </style:style>
    <style:style style:name="P125" style:family="paragraph" style:parent-style-name="Standard" style:list-style-name="L17">
      <style:text-properties officeooo:rsid="001e578a" officeooo:paragraph-rsid="001e578a"/>
    </style:style>
    <style:style style:name="P126" style:family="paragraph" style:parent-style-name="Standard" style:list-style-name="L17">
      <style:text-properties officeooo:rsid="0190d229" officeooo:paragraph-rsid="01916631"/>
    </style:style>
    <style:style style:name="P127" style:family="paragraph" style:parent-style-name="Standard" style:list-style-name="L17">
      <style:text-properties officeooo:rsid="01916631" officeooo:paragraph-rsid="01916631"/>
    </style:style>
    <style:style style:name="P128" style:family="paragraph" style:parent-style-name="Standard" style:list-style-name="L17">
      <style:text-properties officeooo:rsid="01932bee" officeooo:paragraph-rsid="01932bee"/>
    </style:style>
    <style:style style:name="P129" style:family="paragraph" style:parent-style-name="Standard">
      <style:text-properties officeooo:paragraph-rsid="037c8fea"/>
    </style:style>
    <style:style style:name="P130" style:family="paragraph" style:parent-style-name="Standard">
      <style:text-properties officeooo:rsid="0199d6b3" officeooo:paragraph-rsid="0199d6b3"/>
    </style:style>
    <style:style style:name="P131" style:family="paragraph" style:parent-style-name="Table_20_Contents">
      <style:text-properties officeooo:rsid="0199d6b3" officeooo:paragraph-rsid="0199d6b3"/>
    </style:style>
    <style:style style:name="P132" style:family="paragraph" style:parent-style-name="Standard" style:list-style-name="L18">
      <style:text-properties officeooo:rsid="0383ef27" officeooo:paragraph-rsid="0384967d"/>
    </style:style>
    <style:style style:name="P133" style:family="paragraph" style:parent-style-name="Standard" style:list-style-name="L18">
      <style:text-properties officeooo:rsid="0384967d" officeooo:paragraph-rsid="0393ef92"/>
    </style:style>
    <style:style style:name="P134" style:family="paragraph" style:parent-style-name="Standard">
      <style:text-properties officeooo:paragraph-rsid="02a3f1e5"/>
    </style:style>
    <style:style style:name="P135" style:family="paragraph" style:parent-style-name="Standard">
      <style:text-properties officeooo:rsid="02a49181" officeooo:paragraph-rsid="02be7ce0"/>
    </style:style>
    <style:style style:name="P136"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137"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fo:color="#127622" loext:opacity="100%" style:font-name="Liberation Sans" fo:font-size="12pt" fo:font-weight="normal" style:font-size-asian="12pt" style:font-weight-asian="normal" style:font-size-complex="12pt" style:font-weight-complex="normal"/>
    </style:style>
    <style:style style:name="P138"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style:font-size-asian="12pt" style:font-size-complex="12pt"/>
    </style:style>
    <style:style style:name="P139"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fo:font-weight="normal" style:font-size-asian="12pt" style:font-weight-asian="normal" style:font-size-complex="12pt" style:font-weight-complex="normal"/>
    </style:style>
    <style:style style:name="P140" style:family="paragraph" style:parent-style-name="Table_20_Contents">
      <style:paragraph-properties fo:margin-left="0in" fo:margin-right="0in" fo:margin-top="0in" fo:margin-bottom="0.0972in" style:contextual-spacing="false" fo:line-height="114%" fo:text-align="left" style:justify-single-word="false" fo:text-indent="0in" style:auto-text-indent="false"/>
      <style:text-properties style:font-name="Liberation Sans" fo:font-size="12pt" fo:font-style="italic" style:font-size-asian="12pt" style:font-size-complex="12pt"/>
    </style:style>
    <style:style style:name="P141" style:family="paragraph" style:parent-style-name="Standard">
      <style:text-properties officeooo:rsid="05223b6a" officeooo:paragraph-rsid="05223b6a"/>
    </style:style>
    <style:style style:name="P142" style:family="paragraph" style:parent-style-name="Standard">
      <style:text-properties officeooo:paragraph-rsid="03af3ea2"/>
    </style:style>
    <style:style style:name="P143" style:family="paragraph" style:parent-style-name="Standard">
      <style:text-properties officeooo:rsid="04be85f5" officeooo:paragraph-rsid="04be85f5"/>
    </style:style>
    <style:style style:name="P144" style:family="paragraph" style:parent-style-name="Standard">
      <style:text-properties officeooo:rsid="03ef5622" officeooo:paragraph-rsid="04be85f5"/>
    </style:style>
    <style:style style:name="P145" style:family="paragraph" style:parent-style-name="Table_20_Contents">
      <style:text-properties fo:color="#127622" loext:opacity="100%" officeooo:paragraph-rsid="04c1a1b6"/>
    </style:style>
    <style:style style:name="P146" style:family="paragraph" style:parent-style-name="Table_20_Contents">
      <style:text-properties officeooo:paragraph-rsid="04c1a1b6"/>
    </style:style>
    <style:style style:name="P147" style:family="paragraph" style:parent-style-name="Standard">
      <style:text-properties officeooo:rsid="04c782a1" officeooo:paragraph-rsid="04c782a1"/>
    </style:style>
    <style:style style:name="P148" style:family="paragraph" style:parent-style-name="Standard">
      <style:text-properties officeooo:rsid="04c782a1" officeooo:paragraph-rsid="04d92175"/>
    </style:style>
    <style:style style:name="P149" style:family="paragraph" style:parent-style-name="Standard">
      <style:text-properties officeooo:rsid="04c782a1" officeooo:paragraph-rsid="04db8581"/>
    </style:style>
    <style:style style:name="P150" style:family="paragraph" style:parent-style-name="Standard" style:list-style-name="L19">
      <style:text-properties officeooo:rsid="04c782a1" officeooo:paragraph-rsid="0505612b"/>
    </style:style>
    <style:style style:name="P151" style:family="paragraph" style:parent-style-name="Table_20_Contents">
      <style:text-properties fo:color="#127622" loext:opacity="100%" officeooo:paragraph-rsid="02c63099"/>
    </style:style>
    <style:style style:name="P152" style:family="paragraph" style:parent-style-name="Table_20_Contents">
      <style:text-properties officeooo:paragraph-rsid="02c63099"/>
    </style:style>
    <style:style style:name="P153" style:family="paragraph" style:parent-style-name="Standard">
      <style:text-properties officeooo:rsid="003d40da" officeooo:paragraph-rsid="02c63099"/>
    </style:style>
    <style:style style:name="P154" style:family="paragraph" style:parent-style-name="Standard">
      <style:text-properties officeooo:paragraph-rsid="040f8ed4"/>
    </style:style>
    <style:style style:name="P155" style:family="paragraph" style:parent-style-name="Standard">
      <style:text-properties officeooo:paragraph-rsid="031b0ae0"/>
    </style:style>
    <style:style style:name="P156" style:family="paragraph" style:parent-style-name="Standard">
      <style:text-properties fo:font-weight="bold" officeooo:paragraph-rsid="031b0ae0" style:font-weight-asian="bold" style:font-weight-complex="bold"/>
    </style:style>
    <style:style style:name="P157" style:family="paragraph" style:parent-style-name="Standard">
      <style:text-properties officeooo:rsid="00d74b97" officeooo:paragraph-rsid="00d74b97"/>
    </style:style>
    <style:style style:name="P158" style:family="paragraph" style:parent-style-name="Standard">
      <style:text-properties officeooo:rsid="04214a91" officeooo:paragraph-rsid="04214a91"/>
    </style:style>
    <style:style style:name="P159" style:family="paragraph" style:parent-style-name="Standard">
      <style:text-properties officeooo:rsid="004383b5" officeooo:paragraph-rsid="004383b5"/>
    </style:style>
    <style:style style:name="P160" style:family="paragraph" style:parent-style-name="Standard" style:list-style-name="L20">
      <style:text-properties officeooo:rsid="00932703" officeooo:paragraph-rsid="03997b39"/>
    </style:style>
    <style:style style:name="P161" style:family="paragraph" style:parent-style-name="Standard" style:list-style-name="L20">
      <style:text-properties officeooo:rsid="0425b300" officeooo:paragraph-rsid="0425b300"/>
    </style:style>
    <style:style style:name="P162" style:family="paragraph" style:parent-style-name="Standard" style:list-style-name="L21">
      <style:text-properties officeooo:rsid="00d84df9" officeooo:paragraph-rsid="00d84df9"/>
    </style:style>
    <style:style style:name="P163" style:family="paragraph" style:parent-style-name="Standard" style:list-style-name="L21">
      <style:text-properties officeooo:rsid="00d98ee5" officeooo:paragraph-rsid="00d98ee5"/>
    </style:style>
    <style:style style:name="P164" style:family="paragraph" style:parent-style-name="Standard" style:list-style-name="L20">
      <style:text-properties officeooo:rsid="00d84df9" officeooo:paragraph-rsid="00d84df9"/>
    </style:style>
    <style:style style:name="P165" style:family="paragraph" style:parent-style-name="Standard">
      <style:text-properties officeooo:rsid="003d40da" officeooo:paragraph-rsid="004383b5"/>
    </style:style>
    <style:style style:name="P166" style:family="paragraph" style:parent-style-name="Standard">
      <style:text-properties officeooo:rsid="0426c6d8" officeooo:paragraph-rsid="0426c6d8"/>
    </style:style>
    <style:style style:name="P167" style:family="paragraph" style:parent-style-name="Standard">
      <style:text-properties officeooo:rsid="009deb3b" officeooo:paragraph-rsid="009deb3b"/>
    </style:style>
    <style:style style:name="P168" style:family="paragraph" style:parent-style-name="Standard">
      <style:text-properties officeooo:rsid="00a0046d" officeooo:paragraph-rsid="00a0046d"/>
    </style:style>
    <style:style style:name="P169" style:family="paragraph" style:parent-style-name="Standard">
      <style:text-properties officeooo:rsid="00a3eb4d" officeooo:paragraph-rsid="00a3eb4d"/>
    </style:style>
    <style:style style:name="P170" style:family="paragraph" style:parent-style-name="Standard">
      <style:text-properties officeooo:rsid="00a3eb4d" officeooo:paragraph-rsid="04f747cb"/>
    </style:style>
    <style:style style:name="P171" style:family="paragraph" style:parent-style-name="Standard">
      <style:text-properties officeooo:rsid="00a3eb4d" officeooo:paragraph-rsid="042c87ff"/>
    </style:style>
    <style:style style:name="P172" style:family="paragraph" style:parent-style-name="Standard">
      <style:text-properties officeooo:rsid="003d40da" officeooo:paragraph-rsid="003d40da"/>
    </style:style>
    <style:style style:name="P173" style:family="paragraph" style:parent-style-name="Standard">
      <style:text-properties officeooo:rsid="003d40da" officeooo:paragraph-rsid="00a5defc"/>
    </style:style>
    <style:style style:name="P174" style:family="paragraph" style:parent-style-name="Standard" style:list-style-name="L22">
      <style:text-properties officeooo:rsid="003d40da" officeooo:paragraph-rsid="00a5defc"/>
    </style:style>
    <style:style style:name="P175" style:family="paragraph" style:parent-style-name="Standard">
      <style:text-properties officeooo:rsid="00a6bdb8" officeooo:paragraph-rsid="04f8f80e"/>
    </style:style>
    <style:style style:name="P176" style:family="paragraph" style:parent-style-name="Standard">
      <style:text-properties officeooo:paragraph-rsid="04f8f80e"/>
    </style:style>
    <style:style style:name="P177" style:family="paragraph" style:parent-style-name="Standard">
      <style:text-properties officeooo:paragraph-rsid="00a6bdb8"/>
    </style:style>
    <style:style style:name="P178" style:family="paragraph" style:parent-style-name="Standard">
      <style:text-properties officeooo:rsid="003d40da" officeooo:paragraph-rsid="043805f8"/>
    </style:style>
    <style:style style:name="P179" style:family="paragraph" style:parent-style-name="Standard">
      <style:text-properties officeooo:paragraph-rsid="0439e138"/>
    </style:style>
    <style:style style:name="P180" style:family="paragraph" style:parent-style-name="Standard">
      <style:text-properties officeooo:rsid="04f90edd" officeooo:paragraph-rsid="04f90edd"/>
    </style:style>
    <style:style style:name="P181" style:family="paragraph" style:parent-style-name="Standard">
      <style:text-properties officeooo:rsid="003d40da" officeooo:paragraph-rsid="0439e138"/>
    </style:style>
    <style:style style:name="P182" style:family="paragraph" style:parent-style-name="Standard">
      <style:paragraph-properties fo:text-align="center" style:justify-single-word="false"/>
      <style:text-properties officeooo:paragraph-rsid="0123dedc"/>
    </style:style>
    <style:style style:name="P183" style:family="paragraph" style:parent-style-name="Standard">
      <style:paragraph-properties fo:text-align="center" style:justify-single-word="false"/>
      <style:text-properties style:font-name="Liberation Sans" fo:font-size="12pt" officeooo:paragraph-rsid="00ea6636" style:font-size-asian="12pt" style:font-size-complex="12pt"/>
    </style:style>
    <style:style style:name="P184" style:family="paragraph" style:parent-style-name="Quotations">
      <style:paragraph-properties fo:margin-left="0in" fo:margin-right="0.3937in" fo:margin-top="0in" fo:margin-bottom="0.1965in" style:contextual-spacing="false" fo:line-height="100%" fo:text-indent="0in" style:auto-text-indent="false"/>
      <style:text-properties style:font-name="Liberation Sans" fo:font-size="12pt" officeooo:rsid="012e3240" officeooo:paragraph-rsid="012e3240" style:font-size-asian="12pt" style:font-size-complex="12pt"/>
    </style:style>
    <style:style style:name="P185" style:family="paragraph" style:parent-style-name="Table_20_Contents">
      <style:text-properties fo:color="#127622" loext:opacity="100%" fo:font-size="12pt" style:font-size-asian="12pt" style:font-size-complex="12pt"/>
    </style:style>
    <style:style style:name="P186" style:family="paragraph" style:parent-style-name="Table_20_Contents">
      <style:text-properties fo:font-size="12pt" style:font-size-asian="12pt" style:font-size-complex="12pt"/>
    </style:style>
    <style:style style:name="T1" style:family="text">
      <style:text-properties fo:font-style="italic"/>
    </style:style>
    <style:style style:name="T2" style:family="text">
      <style:text-properties officeooo:rsid="057f86d9"/>
    </style:style>
    <style:style style:name="T3" style:family="text">
      <style:text-properties officeooo:rsid="057e13da"/>
    </style:style>
    <style:style style:name="T4" style:family="text">
      <style:text-properties officeooo:rsid="0581abd6"/>
    </style:style>
    <style:style style:name="T5" style:family="text">
      <style:text-properties officeooo:rsid="057fed58"/>
    </style:style>
    <style:style style:name="T6" style:family="text">
      <style:text-properties officeooo:rsid="05842e37"/>
    </style:style>
    <style:style style:name="T7" style:family="text">
      <style:text-properties officeooo:rsid="0582c00c"/>
    </style:style>
    <style:style style:name="T8" style:family="text">
      <style:text-properties officeooo:rsid="0584528a"/>
    </style:style>
    <style:style style:name="T9" style:family="text">
      <style:text-properties officeooo:rsid="056ed381"/>
    </style:style>
    <style:style style:name="T10" style:family="text">
      <style:text-properties officeooo:rsid="0568aa39"/>
    </style:style>
    <style:style style:name="T11" style:family="text">
      <style:text-properties fo:color="#127622" loext:opacity="100%"/>
    </style:style>
    <style:style style:name="T12" style:family="text">
      <style:text-properties fo:color="#127622" loext:opacity="100%" officeooo:rsid="0240d84b"/>
    </style:style>
    <style:style style:name="T13" style:family="text">
      <style:text-properties officeooo:rsid="023ff892"/>
    </style:style>
    <style:style style:name="T14" style:family="text">
      <style:text-properties fo:font-weight="bold" style:font-weight-asian="bold" style:font-weight-complex="bold"/>
    </style:style>
    <style:style style:name="T15" style:family="text">
      <style:text-properties officeooo:rsid="00502950"/>
    </style:style>
    <style:style style:name="T16" style:family="text">
      <style:text-properties fo:color="#127622" loext:opacity="100%" officeooo:rsid="00502950"/>
    </style:style>
    <style:style style:name="T17" style:family="text">
      <style:text-properties officeooo:rsid="004f3706"/>
    </style:style>
    <style:style style:name="T18" style:family="text">
      <style:text-properties fo:color="#127622" loext:opacity="100%" officeooo:rsid="004f3706"/>
    </style:style>
    <style:style style:name="T19" style:family="text">
      <style:text-properties officeooo:rsid="001d3809"/>
    </style:style>
    <style:style style:name="T20" style:family="text">
      <style:text-properties officeooo:rsid="014ec6d3"/>
    </style:style>
    <style:style style:name="T21" style:family="text">
      <style:text-properties fo:color="#127622" loext:opacity="100%" officeooo:rsid="014ec6d3"/>
    </style:style>
    <style:style style:name="T22" style:family="text">
      <style:text-properties officeooo:rsid="01440474"/>
    </style:style>
    <style:style style:name="T23" style:family="text">
      <style:text-properties officeooo:rsid="0364f8ca"/>
    </style:style>
    <style:style style:name="T24" style:family="text">
      <style:text-properties officeooo:rsid="003217d3"/>
    </style:style>
    <style:style style:name="T25" style:family="text">
      <style:text-properties officeooo:rsid="00c80bea"/>
    </style:style>
    <style:style style:name="T26" style:family="text">
      <style:text-properties officeooo:rsid="014a52e2"/>
    </style:style>
    <style:style style:name="T27" style:family="text">
      <style:text-properties style:font-name="Liberation Serif" fo:font-size="14pt" officeooo:rsid="00ea6636" style:font-size-asian="12.25pt" style:font-size-complex="14pt"/>
    </style:style>
    <style:style style:name="T28" style:family="text">
      <style:text-properties style:font-name="Liberation Serif" fo:font-size="14pt" officeooo:rsid="00eb3936" style:font-size-asian="12.25pt" style:font-size-complex="14pt"/>
    </style:style>
    <style:style style:name="T29" style:family="text">
      <style:text-properties fo:font-weight="bold"/>
    </style:style>
    <style:style style:name="T30" style:family="text">
      <style:text-properties officeooo:rsid="047f5c49"/>
    </style:style>
    <style:style style:name="T31" style:family="text">
      <style:text-properties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normal" officeooo:rsid="047f5c49" style:font-style-asian="normal" style:font-style-complex="normal"/>
    </style:style>
    <style:style style:name="T34" style:family="text">
      <style:text-properties fo:font-style="normal" officeooo:rsid="0324ec2c" style:font-style-asian="normal" style:font-style-complex="normal"/>
    </style:style>
    <style:style style:name="T35" style:family="text">
      <style:text-properties fo:font-style="normal" officeooo:rsid="03237b32" style:font-style-asian="normal" style:font-style-complex="normal"/>
    </style:style>
    <style:style style:name="T36" style:family="text">
      <style:text-properties fo:font-style="normal" officeooo:rsid="036e3049" style:font-style-asian="normal" style:font-style-complex="normal"/>
    </style:style>
    <style:style style:name="T37" style:family="text">
      <style:text-properties officeooo:rsid="0480b9c8"/>
    </style:style>
    <style:style style:name="T38" style:family="text">
      <style:text-properties fo:background-color="#ffff00" loext:char-shading-value="0"/>
    </style:style>
    <style:style style:name="T39" style:family="text">
      <style:text-properties fo:color="#ff0000" loext:opacity="100%" fo:background-color="#ffff00" loext:char-shading-value="0"/>
    </style:style>
    <style:style style:name="T40" style:family="text">
      <style:text-properties style:text-position="super 58%"/>
    </style:style>
    <style:style style:name="T41" style:family="text">
      <style:text-properties fo:background-color="transparent" loext:char-shading-value="0"/>
    </style:style>
    <style:style style:name="T42" style:family="text">
      <style:text-properties fo:color="#ff0000" loext:opacity="100%"/>
    </style:style>
    <style:style style:name="T43" style:family="text">
      <style:text-properties officeooo:rsid="044e4f41"/>
    </style:style>
    <style:style style:name="T44" style:family="text">
      <style:text-properties fo:font-style="italic" officeooo:rsid="044dbbe1" style:font-style-asian="italic" style:font-style-complex="italic"/>
    </style:style>
    <style:style style:name="T45" style:family="text">
      <style:text-properties officeooo:rsid="046c626f"/>
    </style:style>
    <style:style style:name="T46" style:family="text">
      <style:text-properties officeooo:rsid="045fced3"/>
    </style:style>
    <style:style style:name="T47" style:family="text">
      <style:text-properties officeooo:rsid="046e6f3e"/>
    </style:style>
    <style:style style:name="T48" style:family="text">
      <style:text-properties officeooo:rsid="05897217"/>
    </style:style>
    <style:style style:name="T49" style:family="text">
      <style:text-properties officeooo:rsid="0450e71d"/>
    </style:style>
    <style:style style:name="T50" style:family="text">
      <style:text-properties officeooo:rsid="05675d45"/>
    </style:style>
    <style:style style:name="T51" style:family="text">
      <style:text-properties officeooo:rsid="0451b411"/>
    </style:style>
    <style:style style:name="T52" style:family="text">
      <style:text-properties fo:font-style="italic" officeooo:rsid="0451b411" style:font-style-asian="italic" style:font-style-complex="italic"/>
    </style:style>
    <style:style style:name="T53" style:family="text">
      <style:text-properties officeooo:rsid="0453b06c"/>
    </style:style>
    <style:style style:name="T54" style:family="text">
      <style:text-properties officeooo:rsid="04474e24"/>
    </style:style>
    <style:style style:name="T55" style:family="text">
      <style:text-properties fo:font-style="italic" officeooo:rsid="04474e24" style:font-style-asian="italic" style:font-style-complex="italic"/>
    </style:style>
    <style:style style:name="T56" style:family="text">
      <style:text-properties style:font-name="Liberation Sans" fo:font-size="12pt" style:font-size-asian="12pt" style:font-size-complex="12pt"/>
    </style:style>
    <style:style style:name="T57"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58" style:family="text">
      <style:text-properties style:font-name="Liberation Sans" fo:font-size="12pt" fo:font-weight="bold" style:font-size-asian="12pt" style:font-size-complex="12pt"/>
    </style:style>
    <style:style style:name="T59" style:family="text">
      <style:text-properties style:font-name="Liberation Sans" fo:font-size="12pt" fo:font-weight="bold" style:font-size-asian="12pt" style:font-weight-asian="bold" style:font-size-complex="12pt" style:font-weight-complex="bold"/>
    </style:style>
    <style:style style:name="T60" style:family="text">
      <style:text-properties style:font-name="Liberation Sans" fo:font-size="12pt" fo:font-weight="normal" style:font-size-asian="12pt" style:font-weight-asian="normal" style:font-size-complex="12pt" style:font-weight-complex="normal"/>
    </style:style>
    <style:style style:name="T61" style:family="text">
      <style:text-properties style:font-name="Liberation Sans" fo:font-size="12pt" fo:font-style="italic" style:font-size-asian="12pt" style:font-style-asian="italic" style:font-size-complex="12pt" style:font-style-complex="italic"/>
    </style:style>
    <style:style style:name="T62" style:family="text">
      <style:text-properties style:font-name="Liberation Sans" fo:font-size="12pt" fo:font-style="italic" officeooo:rsid="0468f1a9" style:font-size-asian="12pt" style:font-style-asian="italic" style:font-size-complex="12pt" style:font-style-complex="italic"/>
    </style:style>
    <style:style style:name="T63" style:family="text">
      <style:text-properties style:font-name="Liberation Sans" fo:font-size="12pt" fo:font-weight="bold" officeooo:rsid="0562acb3" style:font-size-asian="12pt" style:font-weight-asian="bold" style:font-size-complex="12pt" style:font-weight-complex="bold"/>
    </style:style>
    <style:style style:name="T64" style:family="text">
      <style:text-properties officeooo:rsid="0533b0c3"/>
    </style:style>
    <style:style style:name="T65" style:family="text">
      <style:text-properties officeooo:rsid="0536b862"/>
    </style:style>
    <style:style style:name="T66" style:family="text">
      <style:text-properties officeooo:rsid="058b151e"/>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officeooo:rsid="05370876"/>
    </style:style>
    <style:style style:name="T69" style:family="text">
      <style:text-properties officeooo:rsid="0537b319"/>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officeooo:rsid="05384c2b"/>
    </style:style>
    <style:style style:name="T72" style:family="text">
      <style:text-properties officeooo:rsid="053cf67b"/>
    </style:style>
    <style:style style:name="T73" style:family="text">
      <style:text-properties officeooo:rsid="05679973"/>
    </style:style>
    <style:style style:name="T74" style:family="text">
      <style:text-properties fo:font-weight="normal" style:font-weight-asian="normal" style:font-weight-complex="normal"/>
    </style:style>
    <style:style style:name="T75" style:family="text">
      <style:text-properties officeooo:rsid="054870f8"/>
    </style:style>
    <style:style style:name="T76" style:family="text">
      <style:text-properties officeooo:rsid="054b2744"/>
    </style:style>
    <style:style style:name="T77" style:family="text">
      <style:text-properties officeooo:rsid="0552b435"/>
    </style:style>
    <style:style style:name="T78" style:family="text">
      <style:text-properties fo:font-style="italic" officeooo:rsid="0552b435" style:font-style-asian="italic" style:font-style-complex="italic"/>
    </style:style>
    <style:style style:name="T79" style:family="text">
      <style:text-properties fo:font-style="italic" officeooo:rsid="0565394d" style:font-style-asian="italic" style:font-style-complex="italic"/>
    </style:style>
    <style:style style:name="T80" style:family="text">
      <style:text-properties officeooo:rsid="0565394d"/>
    </style:style>
    <style:style style:name="T81" style:family="text">
      <style:text-properties fo:color="#127622" loext:opacity="100%" officeooo:rsid="0594e17e"/>
    </style:style>
    <style:style style:name="T82" style:family="text">
      <style:text-properties officeooo:rsid="0594e17e"/>
    </style:style>
    <style:style style:name="T83" style:family="text">
      <style:text-properties fo:font-weight="bold" officeooo:rsid="0594e17e" style:font-weight-asian="bold" style:font-weight-complex="bold"/>
    </style:style>
    <style:style style:name="T84" style:family="text">
      <style:text-properties officeooo:rsid="05951095"/>
    </style:style>
    <style:style style:name="T85" style:family="text">
      <style:text-properties officeooo:rsid="055ecca9"/>
    </style:style>
    <style:style style:name="T86" style:family="text">
      <style:text-properties officeooo:rsid="05606615"/>
    </style:style>
    <style:style style:name="T87" style:family="text">
      <style:text-properties officeooo:rsid="0560f483"/>
    </style:style>
    <style:style style:name="T88" style:family="text">
      <style:text-properties officeooo:rsid="0488d7c4"/>
    </style:style>
    <style:style style:name="T89" style:family="text">
      <style:text-properties officeooo:rsid="01b8af13"/>
    </style:style>
    <style:style style:name="T90" style:family="text">
      <style:text-properties officeooo:rsid="03b36ed6"/>
    </style:style>
    <style:style style:name="T91" style:family="text">
      <style:text-properties fo:color="#127622" loext:opacity="100%" officeooo:rsid="049a3c9b"/>
    </style:style>
    <style:style style:name="T92" style:family="text">
      <style:text-properties officeooo:rsid="059aba9a"/>
    </style:style>
    <style:style style:name="T93" style:family="text">
      <style:text-properties officeooo:rsid="059ca324"/>
    </style:style>
    <style:style style:name="T94" style:family="text">
      <style:text-properties officeooo:rsid="01c87223"/>
    </style:style>
    <style:style style:name="T95" style:family="text">
      <style:text-properties officeooo:rsid="03b7d1fd"/>
    </style:style>
    <style:style style:name="T96" style:family="text">
      <style:text-properties officeooo:rsid="0307fd1f"/>
    </style:style>
    <style:style style:name="T97" style:family="text">
      <style:text-properties fo:color="#127622" loext:opacity="100%" officeooo:rsid="059e706a"/>
    </style:style>
    <style:style style:name="T98" style:family="text">
      <style:text-properties officeooo:rsid="059e706a"/>
    </style:style>
    <style:style style:name="T99" style:family="text">
      <style:text-properties fo:color="#127622" loext:opacity="100%" officeooo:rsid="059e7dcf"/>
    </style:style>
    <style:style style:name="T100" style:family="text">
      <style:text-properties fo:color="#127622" loext:opacity="100%" officeooo:rsid="01c9f31c"/>
    </style:style>
    <style:style style:name="T101" style:family="text">
      <style:text-properties officeooo:rsid="01c9f31c"/>
    </style:style>
    <style:style style:name="T102" style:family="text">
      <style:text-properties fo:color="#127622" loext:opacity="100%" officeooo:rsid="059fdcf2"/>
    </style:style>
    <style:style style:name="T103" style:family="text">
      <style:text-properties fo:color="#127622" loext:opacity="100%" officeooo:rsid="01c46ddf"/>
    </style:style>
    <style:style style:name="T104" style:family="text">
      <style:text-properties officeooo:rsid="01c46ddf"/>
    </style:style>
    <style:style style:name="T105" style:family="text">
      <style:text-properties fo:color="#127622" loext:opacity="100%" officeooo:rsid="05a328af"/>
    </style:style>
    <style:style style:name="T106" style:family="text">
      <style:text-properties officeooo:rsid="05a328af"/>
    </style:style>
    <style:style style:name="T107" style:family="text">
      <style:text-properties fo:color="#127622" loext:opacity="100%" officeooo:rsid="01c603b7"/>
    </style:style>
    <style:style style:name="T108" style:family="text">
      <style:text-properties officeooo:rsid="01c603b7"/>
    </style:style>
    <style:style style:name="T109" style:family="text">
      <style:text-properties fo:color="#127622" loext:opacity="100%" officeooo:rsid="031ca826"/>
    </style:style>
    <style:style style:name="T110" style:family="text">
      <style:text-properties officeooo:rsid="03b8d7cc"/>
    </style:style>
    <style:style style:name="T111" style:family="text">
      <style:text-properties fo:font-style="italic" fo:font-weight="bold" officeooo:rsid="03b8d7cc" style:font-style-asian="italic" style:font-weight-asian="bold" style:font-style-complex="italic" style:font-weight-complex="bold"/>
    </style:style>
    <style:style style:name="T112" style:family="text">
      <style:text-properties fo:color="#127622" loext:opacity="100%" officeooo:rsid="01caa4a8"/>
    </style:style>
    <style:style style:name="T113" style:family="text">
      <style:text-properties officeooo:rsid="01caa4a8"/>
    </style:style>
    <style:style style:name="T114" style:family="text">
      <style:text-properties fo:color="#127622" loext:opacity="100%" officeooo:rsid="05a4faf7"/>
    </style:style>
    <style:style style:name="T115" style:family="text">
      <style:text-properties officeooo:rsid="02913e68"/>
    </style:style>
    <style:style style:name="T116" style:family="text">
      <style:text-properties fo:color="#127622" loext:opacity="100%" officeooo:rsid="01cbda78"/>
    </style:style>
    <style:style style:name="T117" style:family="text">
      <style:text-properties fo:color="#127622" loext:opacity="100%" officeooo:rsid="05a6bce3"/>
    </style:style>
    <style:style style:name="T118" style:family="text">
      <style:text-properties officeooo:rsid="05a6bce3"/>
    </style:style>
    <style:style style:name="T119" style:family="text">
      <style:text-properties officeooo:rsid="01d26fc3"/>
    </style:style>
    <style:style style:name="T120" style:family="text">
      <style:text-properties fo:color="#127622" loext:opacity="100%" officeooo:rsid="01cd08f2"/>
    </style:style>
    <style:style style:name="T121" style:family="text">
      <style:text-properties fo:color="#127622" loext:opacity="100%" officeooo:rsid="05a84ebc"/>
    </style:style>
    <style:style style:name="T122" style:family="text">
      <style:text-properties officeooo:rsid="05a84ebc"/>
    </style:style>
    <style:style style:name="T123" style:family="text">
      <style:text-properties officeooo:rsid="00608121"/>
    </style:style>
    <style:style style:name="T124" style:family="text">
      <style:text-properties officeooo:rsid="01b0619f"/>
    </style:style>
    <style:style style:name="T125" style:family="text">
      <style:text-properties officeooo:rsid="01b39dcb"/>
    </style:style>
    <style:style style:name="T126" style:family="text">
      <style:text-properties officeooo:rsid="045814e6"/>
    </style:style>
    <style:style style:name="T127" style:family="text">
      <style:text-properties style:font-name="Liberation Serif" fo:font-size="14pt" fo:font-weight="bold" officeooo:rsid="0039ff2f" style:font-size-asian="14pt" style:font-weight-asian="bold" style:font-size-complex="14pt" style:font-weight-complex="bold"/>
    </style:style>
    <style:style style:name="T128" style:family="text">
      <style:text-properties style:font-name="Liberation Serif" fo:font-size="14pt" fo:font-weight="bold" officeooo:rsid="014d9292" style:font-size-asian="14pt" style:font-weight-asian="bold" style:font-size-complex="14pt" style:font-weight-complex="bold"/>
    </style:style>
    <style:style style:name="T129" style:family="text">
      <style:text-properties officeooo:rsid="014daa6c"/>
    </style:style>
    <style:style style:name="T130" style:family="text">
      <style:text-properties fo:background-color="#fff5ce" loext:char-shading-value="0"/>
    </style:style>
    <style:style style:name="T131" style:family="text">
      <style:text-properties officeooo:rsid="001e2011"/>
    </style:style>
    <style:style style:name="T132" style:family="text">
      <style:text-properties officeooo:rsid="01598774"/>
    </style:style>
    <style:style style:name="T133" style:family="text">
      <style:text-properties fo:font-style="normal" officeooo:rsid="0027835c" style:font-style-asian="normal" style:font-style-complex="normal"/>
    </style:style>
    <style:style style:name="T134" style:family="text">
      <style:text-properties fo:font-style="normal" fo:font-weight="bold" officeooo:rsid="0027835c" style:font-style-asian="normal" style:font-weight-asian="bold" style:font-style-complex="normal" style:font-weight-complex="bold"/>
    </style:style>
    <style:style style:name="T135" style:family="text">
      <style:text-properties officeooo:rsid="016a140b"/>
    </style:style>
    <style:style style:name="T136" style:family="text">
      <style:text-properties officeooo:rsid="0053b6bf"/>
    </style:style>
    <style:style style:name="T137" style:family="text">
      <style:text-properties officeooo:rsid="03d64b63"/>
    </style:style>
    <style:style style:name="T138" style:family="text">
      <style:text-properties officeooo:rsid="037a84da"/>
    </style:style>
    <style:style style:name="T139" style:family="text">
      <style:text-properties officeooo:rsid="03d62b9b"/>
    </style:style>
    <style:style style:name="T140" style:family="text">
      <style:text-properties officeooo:rsid="01614f11"/>
    </style:style>
    <style:style style:name="T141" style:family="text">
      <style:text-properties fo:color="#127622" loext:opacity="100%" officeooo:rsid="00356d4a"/>
    </style:style>
    <style:style style:name="T142" style:family="text">
      <style:text-properties officeooo:rsid="00356d4a"/>
    </style:style>
    <style:style style:name="T143" style:family="text">
      <style:text-properties officeooo:rsid="0162047b"/>
    </style:style>
    <style:style style:name="T144" style:family="text">
      <style:text-properties fo:color="#127622" loext:opacity="100%" officeooo:rsid="0162047b"/>
    </style:style>
    <style:style style:name="T145" style:family="text">
      <style:text-properties officeooo:rsid="017472c8"/>
    </style:style>
    <style:style style:name="T146" style:family="text">
      <style:text-properties officeooo:rsid="016c049f"/>
    </style:style>
    <style:style style:name="T147" style:family="text">
      <style:text-properties officeooo:rsid="0167ee66"/>
    </style:style>
    <style:style style:name="T148" style:family="text">
      <style:text-properties officeooo:rsid="02769c56"/>
    </style:style>
    <style:style style:name="T149" style:family="text">
      <style:text-properties officeooo:rsid="016e9ff2"/>
    </style:style>
    <style:style style:name="T150" style:family="text">
      <style:text-properties officeooo:rsid="01661458"/>
    </style:style>
    <style:style style:name="T151" style:family="text">
      <style:text-properties officeooo:rsid="0277da27"/>
    </style:style>
    <style:style style:name="T152" style:family="text">
      <style:text-properties fo:color="#127622" loext:opacity="100%" officeooo:rsid="01661458"/>
    </style:style>
    <style:style style:name="T153" style:family="text">
      <style:text-properties officeooo:rsid="0177902e"/>
    </style:style>
    <style:style style:name="T154" style:family="text">
      <style:text-properties fo:color="#127622" loext:opacity="100%" officeooo:rsid="0177902e"/>
    </style:style>
    <style:style style:name="T155" style:family="text">
      <style:text-properties officeooo:rsid="003ba5c6"/>
    </style:style>
    <style:style style:name="T156" style:family="text">
      <style:text-properties fo:color="#127622" loext:opacity="100%" officeooo:rsid="003ba5c6" fo:background-color="transparent" loext:char-shading-value="0"/>
    </style:style>
    <style:style style:name="T157" style:family="text">
      <style:text-properties officeooo:rsid="003bfa5b"/>
    </style:style>
    <style:style style:name="T158" style:family="text">
      <style:text-properties officeooo:rsid="0039ff2f"/>
    </style:style>
    <style:style style:name="T159" style:family="text">
      <style:text-properties officeooo:rsid="02fa3e27"/>
    </style:style>
    <style:style style:name="T160" style:family="text">
      <style:text-properties fo:font-weight="bold" officeooo:rsid="0039ff2f" style:font-weight-asian="bold" style:font-weight-complex="bold"/>
    </style:style>
    <style:style style:name="T161" style:family="text">
      <style:text-properties fo:font-weight="bold" officeooo:rsid="018115f7" style:font-weight-asian="bold" style:font-weight-complex="bold"/>
    </style:style>
    <style:style style:name="T162" style:family="text">
      <style:text-properties officeooo:rsid="018115f7"/>
    </style:style>
    <style:style style:name="T163" style:family="text">
      <style:text-properties officeooo:rsid="001e578a"/>
    </style:style>
    <style:style style:name="T164" style:family="text">
      <style:text-properties fo:color="#127622" loext:opacity="100%" officeooo:rsid="001e578a"/>
    </style:style>
    <style:style style:name="T165" style:family="text">
      <style:text-properties officeooo:rsid="0194f869"/>
    </style:style>
    <style:style style:name="T166" style:family="text">
      <style:text-properties officeooo:rsid="027a8cd9"/>
    </style:style>
    <style:style style:name="T167" style:family="text">
      <style:text-properties fo:color="#127622" loext:opacity="100%" officeooo:rsid="027a8cd9"/>
    </style:style>
    <style:style style:name="T168" style:family="text">
      <style:text-properties officeooo:rsid="037c8fea"/>
    </style:style>
    <style:style style:name="T169" style:family="text">
      <style:text-properties fo:font-weight="bold" officeooo:rsid="037c8fea" style:font-weight-asian="bold" style:font-weight-complex="bold"/>
    </style:style>
    <style:style style:name="T170" style:family="text">
      <style:text-properties officeooo:rsid="037e75ab"/>
    </style:style>
    <style:style style:name="T171" style:family="text">
      <style:text-properties fo:font-weight="bold" officeooo:rsid="037e75ab" style:font-weight-asian="bold" style:font-weight-complex="bold"/>
    </style:style>
    <style:style style:name="T172" style:family="text">
      <style:text-properties officeooo:rsid="04a3db8d"/>
    </style:style>
    <style:style style:name="T173" style:family="text">
      <style:text-properties fo:color="#127622" loext:opacity="100%" officeooo:rsid="04a3db8d"/>
    </style:style>
    <style:style style:name="T174" style:family="text">
      <style:text-properties officeooo:rsid="04a592de"/>
    </style:style>
    <style:style style:name="T175" style:family="text">
      <style:text-properties officeooo:rsid="04a2a49a"/>
    </style:style>
    <style:style style:name="T176" style:family="text">
      <style:text-properties officeooo:rsid="0199d6b3"/>
    </style:style>
    <style:style style:name="T177" style:family="text">
      <style:text-properties officeooo:rsid="0303dcb9"/>
    </style:style>
    <style:style style:name="T178" style:family="text">
      <style:text-properties officeooo:rsid="019d3b50"/>
    </style:style>
    <style:style style:name="T179" style:family="text">
      <style:text-properties fo:font-weight="bold" officeooo:rsid="019d3b50" style:font-weight-asian="bold" style:font-weight-complex="bold"/>
    </style:style>
    <style:style style:name="T180" style:family="text">
      <style:text-properties officeooo:rsid="04a26fa5"/>
    </style:style>
    <style:style style:name="T181" style:family="text">
      <style:text-properties officeooo:rsid="02107754"/>
    </style:style>
    <style:style style:name="T182" style:family="text">
      <style:text-properties officeooo:rsid="019cd1ac"/>
    </style:style>
    <style:style style:name="T183" style:family="text">
      <style:text-properties officeooo:rsid="03d79fbc"/>
    </style:style>
    <style:style style:name="T184" style:family="text">
      <style:text-properties officeooo:rsid="019bcace"/>
    </style:style>
    <style:style style:name="T185" style:family="text">
      <style:text-properties fo:color="#127622" loext:opacity="100%" officeooo:rsid="019bcace"/>
    </style:style>
    <style:style style:name="T186" style:family="text">
      <style:text-properties officeooo:rsid="028a4218"/>
    </style:style>
    <style:style style:name="T187" style:family="text">
      <style:text-properties officeooo:rsid="01a2ea1f"/>
    </style:style>
    <style:style style:name="T188" style:family="text">
      <style:text-properties style:text-position="super 58%" officeooo:rsid="01a2ea1f"/>
    </style:style>
    <style:style style:name="T189" style:family="text">
      <style:text-properties officeooo:rsid="01a338e4"/>
    </style:style>
    <style:style style:name="T190" style:family="text">
      <style:text-properties fo:font-style="italic" officeooo:rsid="01a338e4" style:font-style-asian="italic" style:font-style-complex="italic"/>
    </style:style>
    <style:style style:name="T191" style:family="text">
      <style:text-properties officeooo:rsid="03d8b7fa"/>
    </style:style>
    <style:style style:name="T192" style:family="text">
      <style:text-properties officeooo:rsid="0384967d"/>
    </style:style>
    <style:style style:name="T193" style:family="text">
      <style:text-properties officeooo:rsid="04ac308c"/>
    </style:style>
    <style:style style:name="T194" style:family="text">
      <style:text-properties officeooo:rsid="04aad7ce"/>
    </style:style>
    <style:style style:name="T195" style:family="text">
      <style:text-properties fo:color="#127622" loext:opacity="100%" officeooo:rsid="04ae3c53"/>
    </style:style>
    <style:style style:name="T196" style:family="text">
      <style:text-properties officeooo:rsid="04ae3c53"/>
    </style:style>
    <style:style style:name="T197" style:family="text">
      <style:text-properties fo:color="#127622" loext:opacity="100%" officeooo:rsid="04aad7ce"/>
    </style:style>
    <style:style style:name="T198" style:family="text">
      <style:text-properties officeooo:rsid="0392ae9e"/>
    </style:style>
    <style:style style:name="T199" style:family="text">
      <style:text-properties officeooo:rsid="03852818"/>
    </style:style>
    <style:style style:name="T200" style:family="text">
      <style:text-properties officeooo:rsid="038a45bf"/>
    </style:style>
    <style:style style:name="T201" style:family="text">
      <style:text-properties fo:color="#127622" loext:opacity="100%" officeooo:rsid="03884eae"/>
    </style:style>
    <style:style style:name="T202" style:family="text">
      <style:text-properties officeooo:rsid="03884eae"/>
    </style:style>
    <style:style style:name="T203" style:family="text">
      <style:text-properties fo:color="#127622" loext:opacity="100%" officeooo:rsid="03852818"/>
    </style:style>
    <style:style style:name="T204" style:family="text">
      <style:text-properties fo:color="#127622" loext:opacity="100%" officeooo:rsid="03870992"/>
    </style:style>
    <style:style style:name="T205" style:family="text">
      <style:text-properties officeooo:rsid="03870992"/>
    </style:style>
    <style:style style:name="T206" style:family="text">
      <style:text-properties fo:color="#127622" loext:opacity="100%" officeooo:rsid="03880716"/>
    </style:style>
    <style:style style:name="T207" style:family="text">
      <style:text-properties officeooo:rsid="038bc91c"/>
    </style:style>
    <style:style style:name="T208" style:family="text">
      <style:text-properties fo:color="#127622" loext:opacity="100%" officeooo:rsid="038bc91c"/>
    </style:style>
    <style:style style:name="T209" style:family="text">
      <style:text-properties fo:color="#127622" loext:opacity="100%" officeooo:rsid="038c6264"/>
    </style:style>
    <style:style style:name="T210" style:family="text">
      <style:text-properties officeooo:rsid="038c6264"/>
    </style:style>
    <style:style style:name="T211" style:family="text">
      <style:text-properties fo:color="#127622" loext:opacity="100%" officeooo:rsid="038e2dd0"/>
    </style:style>
    <style:style style:name="T212" style:family="text">
      <style:text-properties officeooo:rsid="038e2dd0"/>
    </style:style>
    <style:style style:name="T213" style:family="text">
      <style:text-properties fo:color="#127622" loext:opacity="100%" officeooo:rsid="038eff0e"/>
    </style:style>
    <style:style style:name="T214" style:family="text">
      <style:text-properties officeooo:rsid="038eff0e"/>
    </style:style>
    <style:style style:name="T215" style:family="text">
      <style:text-properties fo:color="#127622" loext:opacity="100%" officeooo:rsid="038a45bf"/>
    </style:style>
    <style:style style:name="T216" style:family="text">
      <style:text-properties officeooo:rsid="04a69506"/>
    </style:style>
    <style:style style:name="T217" style:family="text">
      <style:text-properties fo:color="#127622" loext:opacity="100%" officeooo:rsid="04a6efd5"/>
    </style:style>
    <style:style style:name="T218" style:family="text">
      <style:text-properties officeooo:rsid="04a6efd5"/>
    </style:style>
    <style:style style:name="T219" style:family="text">
      <style:text-properties style:font-name="Liberation Serif" fo:font-size="14pt" officeooo:rsid="02a12624" style:font-size-asian="14pt" style:font-size-complex="14pt"/>
    </style:style>
    <style:style style:name="T220" style:family="text">
      <style:text-properties style:font-name="Liberation Serif" fo:font-size="14pt" officeooo:rsid="03110ffd" style:font-size-asian="14pt" style:font-size-complex="14pt"/>
    </style:style>
    <style:style style:name="T221" style:family="text">
      <style:text-properties fo:color="#ff0000" loext:opacity="100%" fo:background-color="transparent" loext:char-shading-value="0"/>
    </style:style>
    <style:style style:name="T222" style:family="text">
      <style:text-properties fo:color="#ff0000" loext:opacity="100%" fo:background-color="#fff5ce" loext:char-shading-value="0"/>
    </style:style>
    <style:style style:name="T223" style:family="text">
      <style:text-properties officeooo:rsid="050e6317"/>
    </style:style>
    <style:style style:name="T224" style:family="text">
      <style:text-properties style:text-position="super 58%" officeooo:rsid="050830c6"/>
    </style:style>
    <style:style style:name="T225" style:family="text">
      <style:text-properties fo:color="#127622" loext:opacity="100%" officeooo:rsid="051533e3"/>
    </style:style>
    <style:style style:name="T226" style:family="text">
      <style:text-properties officeooo:rsid="05105f87"/>
    </style:style>
    <style:style style:name="T227" style:family="text">
      <style:text-properties fo:background-color="#ffdbb6" loext:char-shading-value="0"/>
    </style:style>
    <style:style style:name="T228" style:family="text">
      <style:text-properties officeooo:rsid="05153f1f"/>
    </style:style>
    <style:style style:name="T229" style:family="text">
      <style:text-properties officeooo:rsid="0518f1a7"/>
    </style:style>
    <style:style style:name="T230" style:family="text">
      <style:text-properties officeooo:rsid="051e1f10"/>
    </style:style>
    <style:style style:name="T231" style:family="text">
      <style:text-properties officeooo:rsid="052e3b46"/>
    </style:style>
    <style:style style:name="T232" style:family="text">
      <style:text-properties officeooo:rsid="052e4196"/>
    </style:style>
    <style:style style:name="T233" style:family="text">
      <style:text-properties officeooo:rsid="05301531"/>
    </style:style>
    <style:style style:name="T234" style:family="text">
      <style:text-properties officeooo:rsid="0523d484"/>
    </style:style>
    <style:style style:name="T235" style:family="text">
      <style:text-properties fo:font-style="italic" officeooo:rsid="0523d484" style:font-style-asian="italic" style:font-style-complex="italic"/>
    </style:style>
    <style:style style:name="T236" style:family="text">
      <style:text-properties officeooo:rsid="053108c1"/>
    </style:style>
    <style:style style:name="T237" style:family="text">
      <style:text-properties officeooo:rsid="04bb5408"/>
    </style:style>
    <style:style style:name="T238" style:family="text">
      <style:text-properties officeooo:rsid="03eae708"/>
    </style:style>
    <style:style style:name="T239" style:family="text">
      <style:text-properties style:text-position="super 58%" officeooo:rsid="03eae708"/>
    </style:style>
    <style:style style:name="T240" style:family="text">
      <style:text-properties fo:color="#127622" loext:opacity="100%" officeooo:rsid="04fd7930"/>
    </style:style>
    <style:style style:name="T241" style:family="text">
      <style:text-properties officeooo:rsid="04bfac58"/>
    </style:style>
    <style:style style:name="T242" style:family="text">
      <style:text-properties fo:color="#127622" loext:opacity="100%" officeooo:rsid="04bfac58"/>
    </style:style>
    <style:style style:name="T243" style:family="text">
      <style:text-properties officeooo:rsid="04c4c25d"/>
    </style:style>
    <style:style style:name="T244" style:family="text">
      <style:text-properties officeooo:rsid="04ff77ee"/>
    </style:style>
    <style:style style:name="T245" style:family="text">
      <style:text-properties style:font-name="Liberation Serif" fo:font-size="14pt" fo:font-weight="bold" officeooo:rsid="012577a2" style:font-size-asian="14pt" style:font-weight-asian="bold" style:font-size-complex="14pt" style:font-weight-complex="bold"/>
    </style:style>
    <style:style style:name="T246" style:family="text">
      <style:text-properties style:font-name="Liberation Serif" fo:font-size="14pt" fo:font-weight="bold" officeooo:rsid="0314f170" style:font-size-asian="14pt" style:font-weight-asian="bold" style:font-size-complex="14pt" style:font-weight-complex="bold"/>
    </style:style>
    <style:style style:name="T247" style:family="text">
      <style:text-properties fo:font-weight="normal" fo:background-color="#fff5ce" loext:char-shading-value="0" style:font-weight-asian="normal" style:font-weight-complex="normal"/>
    </style:style>
    <style:style style:name="T248" style:family="text">
      <style:text-properties officeooo:rsid="04ee1e9a"/>
    </style:style>
    <style:style style:name="T249" style:family="text">
      <style:text-properties officeooo:rsid="0422343b"/>
    </style:style>
    <style:style style:name="T250" style:family="text">
      <style:text-properties officeooo:rsid="04224f98"/>
    </style:style>
    <style:style style:name="T251" style:family="text">
      <style:text-properties officeooo:rsid="0424147f"/>
    </style:style>
    <style:style style:name="T252" style:family="text">
      <style:text-properties officeooo:rsid="0424203e"/>
    </style:style>
    <style:style style:name="T253" style:family="text">
      <style:text-properties officeooo:rsid="009b045b"/>
    </style:style>
    <style:style style:name="T254" style:family="text">
      <style:text-properties officeooo:rsid="039c040b"/>
    </style:style>
    <style:style style:name="T255" style:family="text">
      <style:text-properties fo:font-weight="bold" officeooo:rsid="039c040b" style:font-weight-asian="bold" style:font-weight-complex="bold"/>
    </style:style>
    <style:style style:name="T256" style:family="text">
      <style:text-properties officeooo:rsid="00dcd436"/>
    </style:style>
    <style:style style:name="T257" style:family="text">
      <style:text-properties officeooo:rsid="039f18bd"/>
    </style:style>
    <style:style style:name="T258" style:family="text">
      <style:text-properties fo:color="#127622" loext:opacity="100%" officeooo:rsid="03a0f272"/>
    </style:style>
    <style:style style:name="T259" style:family="text">
      <style:text-properties officeooo:rsid="00dbbb74"/>
    </style:style>
    <style:style style:name="T260" style:family="text">
      <style:text-properties fo:font-weight="bold" officeooo:rsid="00dbbb74" style:font-weight-asian="bold" style:font-weight-complex="bold"/>
    </style:style>
    <style:style style:name="T261" style:family="text">
      <style:text-properties fo:font-weight="bold" officeooo:rsid="03995950" style:font-weight-asian="bold" style:font-weight-complex="bold"/>
    </style:style>
    <style:style style:name="T262" style:family="text">
      <style:text-properties fo:color="#127622" loext:opacity="100%" officeooo:rsid="00dcd436"/>
    </style:style>
    <style:style style:name="T263" style:family="text">
      <style:text-properties officeooo:rsid="03a1155e"/>
    </style:style>
    <style:style style:name="T264" style:family="text">
      <style:text-properties officeooo:rsid="03a1fcd5"/>
    </style:style>
    <style:style style:name="T265" style:family="text">
      <style:text-properties fo:color="#127622" loext:opacity="100%" officeooo:rsid="03a1155e"/>
    </style:style>
    <style:style style:name="T266" style:family="text">
      <style:text-properties officeooo:rsid="0398ef9e"/>
    </style:style>
    <style:style style:name="T267" style:family="text">
      <style:text-properties officeooo:rsid="00de927b"/>
    </style:style>
    <style:style style:name="T268" style:family="text">
      <style:text-properties officeooo:rsid="0426c6d8"/>
    </style:style>
    <style:style style:name="T269" style:family="text">
      <style:text-properties fo:font-weight="bold" officeooo:rsid="009ec347" style:font-weight-asian="bold" style:font-weight-complex="bold"/>
    </style:style>
    <style:style style:name="T270" style:family="text">
      <style:text-properties officeooo:rsid="00a0046d"/>
    </style:style>
    <style:style style:name="T271" style:family="text">
      <style:text-properties officeooo:rsid="00e19760"/>
    </style:style>
    <style:style style:name="T272" style:family="text">
      <style:text-properties officeooo:rsid="04280a47"/>
    </style:style>
    <style:style style:name="T273" style:family="text">
      <style:text-properties officeooo:rsid="00a0bc31"/>
    </style:style>
    <style:style style:name="T274" style:family="text">
      <style:text-properties officeooo:rsid="04f570b4"/>
    </style:style>
    <style:style style:name="T275" style:family="text">
      <style:text-properties officeooo:rsid="00b15f8f"/>
    </style:style>
    <style:style style:name="T276" style:family="text">
      <style:text-properties officeooo:rsid="042c87ff"/>
    </style:style>
    <style:style style:name="T277" style:family="text">
      <style:text-properties officeooo:rsid="03a2a39d"/>
    </style:style>
    <style:style style:name="T278" style:family="text">
      <style:text-properties fo:font-weight="bold" officeooo:rsid="042c87ff" style:font-weight-asian="bold" style:font-weight-complex="bold"/>
    </style:style>
    <style:style style:name="T279" style:family="text">
      <style:text-properties officeooo:rsid="042e5058"/>
    </style:style>
    <style:style style:name="T280" style:family="text">
      <style:text-properties officeooo:rsid="0430f32e"/>
    </style:style>
    <style:style style:name="T281" style:family="text">
      <style:text-properties officeooo:rsid="0432b36a"/>
    </style:style>
    <style:style style:name="T282" style:family="text">
      <style:text-properties fo:color="#127622" loext:opacity="100%" officeooo:rsid="0432b36a"/>
    </style:style>
    <style:style style:name="T283" style:family="text">
      <style:text-properties officeooo:rsid="04343844"/>
    </style:style>
    <style:style style:name="T284" style:family="text">
      <style:text-properties officeooo:rsid="00a6bdb8"/>
    </style:style>
    <style:style style:name="T285" style:family="text">
      <style:text-properties officeooo:rsid="00a87314"/>
    </style:style>
    <style:style style:name="T286" style:family="text">
      <style:text-properties fo:font-style="italic" officeooo:rsid="00a6bdb8" style:font-style-asian="italic" style:font-style-complex="italic"/>
    </style:style>
    <style:style style:name="T287" style:family="text">
      <style:text-properties fo:font-weight="bold" officeooo:rsid="00a6bdb8" style:font-weight-asian="bold" style:font-weight-complex="bold"/>
    </style:style>
    <style:style style:name="T288" style:family="text">
      <style:text-properties officeooo:rsid="03a51588"/>
    </style:style>
    <style:style style:name="T289" style:family="text">
      <style:text-properties officeooo:rsid="00b31804"/>
    </style:style>
    <style:style style:name="T290" style:family="text">
      <style:text-properties style:font-name="Liberation Serif" fo:font-size="14pt" fo:font-weight="normal" officeooo:rsid="00ea6636" style:font-size-asian="12.25pt" style:font-weight-asian="normal" style:font-size-complex="14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819in" fo:text-indent="-0.25in" fo:margin-left="0.6819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19in" fo:text-indent="-0.25in" fo:margin-left="0.9319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19in" fo:text-indent="-0.25in" fo:margin-left="1.1819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19in" fo:text-indent="-0.25in" fo:margin-left="1.4319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19in" fo:text-indent="-0.25in" fo:margin-left="1.6819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19in" fo:text-indent="-0.25in" fo:margin-left="1.9319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19in" fo:text-indent="-0.25in" fo:margin-left="2.1819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19in" fo:text-indent="-0.25in" fo:margin-left="2.4319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19in" fo:text-indent="-0.25in" fo:margin-left="2.6819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19in" fo:text-indent="-0.25in" fo:margin-left="2.9319in"/>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What is an Apostle?</text:h>
      <text:p text:style-name="Text_20_body"/>
      <text:p text:style-name="Standard">For centuries, a widely held theological tradition—tracing its roots back over 460 years to the Reformation and the teachings of John Calvin—has maintained two core pillars regarding this question:</text:p>
      <text:p text:style-name="Standard"/>
      <text:list text:style-name="L1">
        <text:list-item>
          <text:p text:style-name="P2">That the specific office of the apostle ceased with the passing of the first-century church.</text:p>
        </text:list-item>
        <text:list-item>
          <text:p text:style-name="P2">That a true apostle must have been an eyewitness of the risen Christ.</text:p>
        </text:list-item>
      </text:list>
      <text:p text:style-name="Standard"/>
      <text:p text:style-name="P3">In Book IV, Chapter 3, Section 4 of his <text:span text:style-name="T1">Institutes of the Christian Religion</text:span>, Calvin explicitly asserts that the offices of apostle, prophet, and evangelist</text:p>
      <text:p text:style-name="P3"/>
      <text:p text:style-name="P4">"were not instituted in the Church to be perpetual, but only to endure so long as churches were to be formed where none previously existed,"</text:p>
      <text:p text:style-name="Standard"/>
      <text:p text:style-name="P3">He categorizes these as "temporary" or "extraordinary" offices tasked with establishing the foundation of the New Testament church. However, in that exact same section, Calvin introduces a caveat that complicates his own cessationist premise. He writes:</text:p>
      <text:p text:style-name="Standard"/>
      <text:p text:style-name="Quotations">"...although I deny not, that afterward God occasionally raised up Apostles, or at least Evangelists, in their stead, as has been done in our time."</text:p>
      <text:p text:style-name="Standard"/>
      <text:p text:style-name="Standard">Despite leaving this open door for God to raise up "extraordinary" apostles in times of systemic church decline or reformation, the broader cessationist tradition that followed Calvin has firmly locked it shut. To justify this absolute cessation, traditional theology has maintained that the office legally required a literal, physical eyewitness of the resurrection.</text:p>
      <text:p text:style-name="Standard"/>
      <text:p text:style-name="Standard">The purpose of this Bible study is to examine both sides of this foundational topic with an emphasis on scrutinizing this long-held tradition using Scripture. <text:span text:style-name="T2">T</text:span><text:span text:style-name="T3">he fundamental knowledge you will need to come to your own conclusions </text:span><text:span text:style-name="T2">will be included. </text:span><text:span text:style-name="T4">E</text:span><text:span text:style-name="T5">very assertion </text:span><text:span text:style-name="T4">and conclusion </text:span><text:span text:style-name="T5">will be built upon the firm foundation of Scripture</text:span><text:span text:style-name="T3">. </text:span><text:span text:style-name="T6">Prepare yourself to be</text:span> presented with <text:span text:style-name="T7">challenging, </text:span>thought-provoking <text:span text:style-name="T8">ideas</text:span> that will demand meditation on the Scriptures, critical thinking, and prayer.</text:p>
      <text:p text:style-name="P5"/>
      <table:table table:name="Table19" table:style-name="Table19">
        <table:table-column table:style-name="Table19.A"/>
        <table:table-column table:style-name="Table19.B"/>
        <table:table-row>
          <table:table-cell table:style-name="Table19.A1" table:number-columns-spanned="2" office:value-type="string">
            <text:p text:style-name="P6">Table of Contents</text:p>
          </table:table-cell>
          <table:covered-table-cell/>
        </table:table-row>
        <table:table-row>
          <table:table-cell table:style-name="Table19.A1" office:value-type="string">
            <text:p text:style-name="P7"><text:a xlink:type="simple" xlink:href="#Dictionary definitions|outline" text:style-name="Internet_20_link" text:visited-style-name="Visited_20_Internet_20_Link">Dictionary definitions</text:a></text:p>
          </table:table-cell>
          <table:table-cell table:style-name="Table19.A1" office:value-type="string">
            <text:p text:style-name="P8">Pg. 2</text:p>
          </table:table-cell>
        </table:table-row>
        <table:table-row>
          <table:table-cell table:style-name="Table19.A1" office:value-type="string">
            <text:p text:style-name="P7"><text:a xlink:type="simple" xlink:href="#Where does the traditional definition come from?|outline" text:style-name="Internet_20_link" text:visited-style-name="Visited_20_Internet_20_Link">Historicity of the tradition</text:a></text:p>
          </table:table-cell>
          <table:table-cell table:style-name="Table19.A1" office:value-type="string">
            <text:p text:style-name="P9">Pg. 3</text:p>
          </table:table-cell>
        </table:table-row>
        <table:table-row>
          <table:table-cell table:style-name="Table19.A1" office:value-type="string">
            <text:p text:style-name="P10"><text:a xlink:type="simple" xlink:href="#Quotes|outline" text:style-name="Internet_20_link" text:visited-style-name="Visited_20_Internet_20_Link">Quotes from John Calvin</text:a></text:p>
          </table:table-cell>
          <table:table-cell table:style-name="Table19.A1" office:value-type="string">
            <text:p text:style-name="P11">Pg. 4</text:p>
          </table:table-cell>
        </table:table-row>
        <table:table-row>
          <table:table-cell table:style-name="Table19.A1" office:value-type="string">
            <text:p text:style-name="P12"><text:a xlink:type="simple" xlink:href="#Quotes|outline" text:style-name="Internet_20_link" text:visited-style-name="Visited_20_Internet_20_Link">Grammar matters</text:a></text:p>
          </table:table-cell>
          <table:table-cell table:style-name="Table19.A1" office:value-type="string">
            <text:p text:style-name="P13">Pg. 5</text:p>
          </table:table-cell>
        </table:table-row>
        <table:table-row>
          <table:table-cell table:style-name="Table19.A1" office:value-type="string">
            <text:p text:style-name="P14"><text:a xlink:type="simple" xlink:href="#Determiners in Scripture|outline" text:style-name="Internet_20_link" text:visited-style-name="Visited_20_Internet_20_Link">Determiners in Scripture</text:a></text:p>
          </table:table-cell>
          <table:table-cell table:style-name="Table19.A1" office:value-type="string">
            <text:p text:style-name="P15">Pg. 6-<text:span text:style-name="T9">7</text:span></text:p>
          </table:table-cell>
        </table:table-row>
        <table:table-row>
          <table:table-cell table:style-name="Table19.A1" office:value-type="string">
            <text:p text:style-name="P16"><text:a xlink:type="simple" xlink:href="#Parallelisms|outline" text:style-name="Internet_20_link" text:visited-style-name="Visited_20_Internet_20_Link">Types of parallelisms in the Bible</text:a></text:p>
          </table:table-cell>
          <table:table-cell table:style-name="Table19.A1" office:value-type="string">
            <text:p text:style-name="P17">Pg. <text:span text:style-name="T10">8</text:span></text:p>
          </table:table-cell>
        </table:table-row>
        <table:table-row>
          <table:table-cell table:style-name="Table19.A1" office:value-type="string">
            <text:p text:style-name="P18"><text:a xlink:type="simple" xlink:href="#The twelve apostles|outline" text:style-name="Internet_20_link" text:visited-style-name="Visited_20_Internet_20_Link">The twelve apostles</text:a></text:p>
          </table:table-cell>
          <table:table-cell table:style-name="Table19.A1" office:value-type="string">
            <text:p text:style-name="P19">Pg. <text:span text:style-name="T9">9</text:span></text:p>
          </table:table-cell>
        </table:table-row>
        <table:table-row>
          <table:table-cell table:style-name="Table19.A1" office:value-type="string">
            <text:p text:style-name="P20"><text:a xlink:type="simple" xlink:href="#Other apostles|outline" text:style-name="Internet_20_link" text:visited-style-name="Visited_20_Internet_20_Link">Other (NT) apostles</text:a></text:p>
          </table:table-cell>
          <table:table-cell table:style-name="Table19.A1" office:value-type="string">
            <text:p text:style-name="P21">Pg. <text:span text:style-name="T9">10</text:span></text:p>
          </table:table-cell>
        </table:table-row>
        <table:table-row>
          <table:table-cell table:style-name="Table19.A1" office:value-type="string">
            <text:p text:style-name="P16"><text:a xlink:type="simple" xlink:href="#Pre-Messianic apostles|outline" text:style-name="Internet_20_link" text:visited-style-name="Visited_20_Internet_20_Link">Pre-Messianic apostles</text:a></text:p>
          </table:table-cell>
          <table:table-cell table:style-name="Table19.A1" office:value-type="string">
            <text:p text:style-name="P22">Pg. <text:span text:style-name="T9">11</text:span></text:p>
          </table:table-cell>
        </table:table-row>
        <table:table-row>
          <table:table-cell table:style-name="Table19.A1" office:value-type="string">
            <text:p text:style-name="P16"><text:a xlink:type="simple" xlink:href="#Continuous apostolic and prophetic messengers|outline" text:style-name="Internet_20_link" text:visited-style-name="Visited_20_Internet_20_Link">Continuous messengers</text:a></text:p>
          </table:table-cell>
          <table:table-cell table:style-name="Table19.A1" office:value-type="string">
            <text:p text:style-name="P23">Pg. 1<text:span text:style-name="T9">2</text:span></text:p>
          </table:table-cell>
        </table:table-row>
        <table:table-row>
          <table:table-cell table:style-name="Table19.A1" office:value-type="string">
            <text:p text:style-name="P16"><text:a xlink:type="simple" xlink:href="#The Gift that keeps on giving|outline" text:style-name="Internet_20_link" text:visited-style-name="Visited_20_Internet_20_Link">The Gift that keeps on giving</text:a></text:p>
          </table:table-cell>
          <table:table-cell table:style-name="Table19.A1" office:value-type="string">
            <text:p text:style-name="P24">Pg. 1<text:span text:style-name="T9">3</text:span></text:p>
          </table:table-cell>
        </table:table-row>
        <table:table-row>
          <table:table-cell table:style-name="Table19.A1" office:value-type="string">
            <text:p text:style-name="P16"><text:a xlink:type="simple" xlink:href="#Paul as the last apostle|outline" text:style-name="Internet_20_link" text:visited-style-name="Visited_20_Internet_20_Link">Paul as the last apostle</text:a></text:p>
          </table:table-cell>
          <table:table-cell table:style-name="Table19.A1" office:value-type="string">
            <text:p text:style-name="P25">Pg. 1<text:span text:style-name="T9">4</text:span></text:p>
          </table:table-cell>
        </table:table-row>
        <table:table-row>
          <table:table-cell table:style-name="Table19.A1" office:value-type="string">
            <text:p text:style-name="P16"><text:a xlink:type="simple" xlink:href="#Qualifications for an apostle|outline" text:style-name="Internet_20_link" text:visited-style-name="Visited_20_Internet_20_Link">Qualifications for an apostle</text:a></text:p>
          </table:table-cell>
          <table:table-cell table:style-name="Table19.A1" office:value-type="string">
            <text:p text:style-name="P26">Pg. 1<text:span text:style-name="T9">5</text:span></text:p>
          </table:table-cell>
        </table:table-row>
      </table:table>
      <text:h text:style-name="P1" text:outline-level="2"><text:soft-page-break/>Dictionary definitions</text:h>
      <text:p text:style-name="Standard"/>
      <text:p text:style-name="Standard"/>
      <text:p text:style-name="P27">Noah Webster’s 1828</text:p>
      <text:p text:style-name="Standard"/>
      <table:table table:name="Table26" table:style-name="Table26">
        <table:table-column table:style-name="Table26.A"/>
        <table:table-row>
          <table:table-cell table:style-name="Table26.A1" office:value-type="string">
            <text:p text:style-name="P28">Apostle</text:p>
            <text:p text:style-name="Table_20_Contents">APOS'TLE, n. [L. apostalus; Gr. to send away, to sent.]</text:p>
            <text:p text:style-name="Table_20_Contents"/>
            <text:p text:style-name="Table_20_Contents">A person deputed to execute some important business; but appropriately, a disciple of Christ commissioned to preach the gospel. Twelve persons were selected by Christ for this purpose; and Judas, one of the number, proving an apostate, his place was supplied by Matthias. <text:span text:style-name="T11">Acts 1</text:span>.</text:p>
            <text:p text:style-name="Table_20_Contents"/>
            <text:p text:style-name="Table_20_Contents">The title of apostle is applied to Christ himself, <text:span text:style-name="T11">Heb 3:</text:span><text:span text:style-name="T12">1</text:span>. In the primitive ages of the church, other ministers were called apostles, <text:span text:style-name="T11">Rom 16</text:span>; as were persons sent to carry alms from one church to another, <text:span text:style-name="T11">Phil 2:</text:span><text:span text:style-name="T12">25</text:span>. This title was also given to persons who first planted the Christian faith. Thus Dionysius of Corinth is called the apostle of France; and the Jesuit Missionaries are called apostles.</text:p>
            <text:p text:style-name="Table_20_Contents"/>
            <text:p text:style-name="Table_20_Contents">Among the Jews, the title was given to officers who were sent into distant provinces, as visitors or commissioners, to see the laws observed.</text:p>
            <text:p text:style-name="Table_20_Contents"/>
            <text:p text:style-name="Table_20_Contents">Apostle, in the Greek liturgy, is a book <text:span text:style-name="T13">containing</text:span> the epistles of St. Paul, printed in the order in which they are to be read in churches, through the year.</text:p>
          </table:table-cell>
        </table:table-row>
      </table:table>
      <text:p text:style-name="Standard"/>
      <text:p text:style-name="Standard"/>
      <text:p text:style-name="P29">Strong’s concordance</text:p>
      <text:p text:style-name="Standard"/>
      <table:table table:name="Table3" table:style-name="Table3">
        <table:table-column table:style-name="Table3.A"/>
        <table:table-row>
          <table:table-cell table:style-name="Table3.A1" office:value-type="string">
            <text:p text:style-name="Standard"><text:span text:style-name="T14">G652</text:span> ἀπόστολος (apóstolos | ap-os'-tol-os)</text:p>
            <text:p text:style-name="Standard"/>
            <text:p text:style-name="P30"><text:span text:style-name="T14">Derivation</text:span>: from <text:span text:style-name="T14">G649</text:span></text:p>
            <text:p text:style-name="P30"><text:span text:style-name="T14">Strong's</text:span>: a delegate; specially, an ambassador of the Gospel; officially a commissioner of Christ ("apostle") (with miraculous powers)</text:p>
            <text:p text:style-name="P30"><text:span text:style-name="T14">KJV</text:span>: apostle <text:span text:style-name="T15">(</text:span><text:span text:style-name="T16">Mat 10:2</text:span><text:span text:style-name="T15">)</text:span>, messenger <text:span text:style-name="T17">(</text:span><text:span text:style-name="T18">2Cor 8:23</text:span><text:span text:style-name="T17">)</text:span>, he that is sent <text:span text:style-name="T17">(</text:span><text:span text:style-name="T18">Joh 13:16</text:span><text:span text:style-name="T17">)</text:span>.</text:p>
            <text:p text:style-name="P31"/>
            <text:p text:style-name="Standard"><text:span text:style-name="T14">See</text:span>: G649</text:p>
            <text:p text:style-name="Standard"/>
            <text:p text:style-name="P32"><text:span text:style-name="T14">Cognate Group</text:span>: G651 (apostleship), G649 (put in), G5570 (false teacher), G1821 (send), G652 (apostle), G3992 (send) Variants: ἀπόστολος</text:p>
            <text:p text:style-name="P32"/>
            <text:p text:style-name="P32"><text:span text:style-name="T14">Hebrew Equivalents</text:span>: H7971 שָׁלַח</text:p>
          </table:table-cell>
        </table:table-row>
      </table:table>
      <text:p text:style-name="P33"/>
      <text:p text:style-name="P33"/>
      <text:p text:style-name="P34"><text:span text:style-name="T19">The word apostle itself simply means “messenger” </text:span><text:span text:style-name="T20">(</text:span><text:span text:style-name="T21">2Cor 8:23</text:span><text:span text:style-name="T20">) </text:span><text:span text:style-name="T19">or “he that is sent” </text:span><text:span text:style-name="T20">(</text:span><text:span text:style-name="T21">John 13:16</text:span><text:span text:style-name="T20">)</text:span><text:span text:style-name="T19">. </text:span><text:span text:style-name="T20">Every usage of G652 is someone that is sent of God</text:span><text:span text:style-name="T22">. </text:span><text:span text:style-name="T23">Thus</text:span><text:span text:style-name="T24">, a strict </text:span><text:span text:style-name="T25">Biblical</text:span><text:span text:style-name="T24"> definition of apostle could be “one that is sent of Go</text:span><text:span text:style-name="T26">d</text:span><text:span text:style-name="T24">”.</text:span></text:p>
      <text:p text:style-name="P35"/>
      <text:p text:style-name="Standard"/>
      <text:p text:style-name="Standard"/>
      <text:p text:style-name="Standard"/>
      <text:p text:style-name="Standard"/>
      <text:p text:style-name="Standard"/>
      <text:h text:style-name="P1" text:outline-level="2"><text:soft-page-break/><text:span text:style-name="T27">Where does th</text:span><text:span text:style-name="T28">e traditional definition</text:span><text:span text:style-name="T27"> come from?</text:span></text:h>
      <text:p text:style-name="P36"/>
      <text:h text:style-name="P37" text:outline-level="2">1. The Protestant Reformation (16th Century) </text:h>
      <text:p text:style-name="P38">The primary catalyst for defining the apostolic office as temporary and strictly limited was <text:span text:style-name="T29">John Calvin</text:span> and his contemporaries. </text:p>
      <text:list text:style-name="L2">
        <text:list-item>
          <text:p text:style-name="P39"><text:span text:style-name="T29">The Catholic Polemic:</text:span> The Roman Catholic Church argued for its supreme authority based on <text:span text:style-name="T1">apostolic succession</text:span>—the claim that the Pope and bishops directly inherited the office, authority, and continuous mantle of the original apostles.</text:p>
        </text:list-item>
        <text:list-item>
          <text:p text:style-name="P39"><text:span text:style-name="T29">The Reformers' Counter-Argument:</text:span> To undermine Rome's claim to ongoing apostolic authority, Calvin argued in his <text:span text:style-name="T1">Institutes of the Christian Religion</text:span> that God established both <text:span text:style-name="T29">temporary (extraordinary)</text:span> and <text:span text:style-name="T29">permanent (ordinary)</text:span> offices. Apostles, prophets, and evangelists were categorized as extraordinary offices meant only for the initiation of the Gospel age.</text:p>
        </text:list-item>
        <text:list-item>
          <text:p text:style-name="P39">To prove that the office had ceased, Reformed theologians <text:span text:style-name="T14">isolated</text:span> specific narrative parameters in Scripture—such as Peter's localized criteria for replacing Judas in <text:span text:style-name="T11">Acts 1:21–22</text:span> and Paul’s rhetorical defense in <text:span text:style-name="T11">1 Corinthians 9:1</text:span>—and elevated them into universal, rigid systemic laws for the definition of the office itself.</text:p>
        </text:list-item>
      </text:list>
      <text:p text:style-name="Standard"/>
      <text:h text:style-name="P40" text:outline-level="2">2. Countering the "Enthusiasts"</text:h>
      <text:p text:style-name="P38">During the same era, the mainstream Reformers were fighting a two-front theological war. Beyond defending against Rome, they were also countering radical Reformation groups (often called "Enthusiasts" or radical Anabaptists) who claimed to receive fresh, direct, infallible revelations from God through contemporary apostolic or prophetic promptings.</text:p>
      <text:p text:style-name="P38">By dogmatically declaring that an apostle <text:span text:style-name="T1">must</text:span> be a physical eyewitness to the resurrection, the Reformers built a theological firewall: if there are no living eyewitnesses to the resurrection, then there are no contemporary apostles, and consequently, no new authoritative text or revelation can be given outside the written canon.</text:p>
      <text:p text:style-name="Standard"/>
      <text:h text:style-name="P40" text:outline-level="2">3. Post-Reformation Scholasticism and Princeton Theology (19th–20th Century)</text:h>
      <text:p text:style-name="P38">The tradition reached its modern, ultra-rigid formulation through Post-Reformation dogmatics and, most notably, the Princetonean theologians like <text:span text:style-name="T29">B.B. Warfield</text:span> (particularly in his 1918 work, <text:span text:style-name="T1">Counterfeit Miracles</text:span>).</text:p>
      <text:list text:style-name="L3">
        <text:list-item>
          <text:p text:style-name="P41"><text:span text:style-name="T29">The Mechanistic Closure:</text:span> Warfield and his contemporaries sought a logical, airtight argument against both Roman Catholic miracle claims and the early emergence of modern pentecostal/charismatic movements.</text:p>
        </text:list-item>
        <text:list-item>
          <text:p text:style-name="P41"><text:span text:style-name="T29">The "Apostles Only" Conundrum:</text:span> They formulated the argument that miraculous "sign gifts" were uniquely tied to the corporate office of the Apostle to authenticate the initial delivery of the New Covenant. They argued that only the original apostles had the power to transmit these capabilities to others. Therefore, once the last person who had personally seen the risen Christ died, the office ended, the supernatural authentication ceased, and the canon was complete.</text:p>
        </text:list-item>
      </text:list>
      <text:p text:style-name="Standard"/>
      <text:p text:style-name="Standard"/>
      <text:p text:style-name="Standard"><text:span text:style-name="T14">Summary of Origin</text:span>:</text:p>
      <text:p text:style-name="Standard"/>
      <text:p text:style-name="Standard">The tradition was forged as a <text:span text:style-name="T29">theological defense mechanism</text:span>. It was built by 16th-century Reformers to strip the Papacy of its "apostolic" claims and to silence radical groups claiming new revelation. It was later solidified into a definitive, systematic rule by 19th-century cessationist theologians looking to establish a clean, historical boundary line at the end of the 1st century.</text:p>
      <text:p text:style-name="Standard"/>
      <text:h text:style-name="P1" text:outline-level="2"><text:soft-page-break/>Quotes</text:h>
      <text:p text:style-name="P42"><text:span text:style-name="T30">from </text:span><text:span text:style-name="T31">John Calvin’s </text:span><text:span text:style-name="T32">The Institutes of the Christian Religion</text:span></text:p>
      <text:p text:style-name="P42"><text:span text:style-name="T31">translated by Henry Beveridge. </text:span><text:span text:style-name="T33">P</text:span><text:span text:style-name="T31">ublished 1845. </text:span><text:span text:style-name="T34">Book 4, Chapter 3, Section 4</text:span><text:span text:style-name="T31">.</text:span></text:p>
      <text:p text:style-name="P42"><text:span text:style-name="T35">Statements </text:span><text:span text:style-name="T36">relevant</text:span><text:span text:style-name="T35"> to this study </text:span><text:span text:style-name="T33">have been</text:span><text:span text:style-name="T35"> highlighted.</text:span></text:p>
      <text:p text:style-name="Standard"/>
      <text:p text:style-name="Standard">Th<text:span text:style-name="T37">e book can be obtained online at the following URLs</text:span>:</text:p>
      <text:p text:style-name="Standard"><text:a xlink:type="simple" xlink:href="https://www.ccel.org/ccel/c/calvin/institutes/cache/institutes.pdf" text:style-name="Internet_20_link" text:visited-style-name="Visited_20_Internet_20_Link">https://www.ccel.org/ccel/c/calvin/institutes/cache/institutes.pdf</text:a></text:p>
      <text:p text:style-name="Standard"><text:a xlink:type="simple" xlink:href="https://cheerful-wmcdannell.wordpress.com/wp-content/uploads/2026/07/john-calvin-institutes-of-the-christian-religion.pdf" text:style-name="Internet_20_link" text:visited-style-name="Visited_20_Internet_20_Link">https://cheerful-wmcdannell.wordpress.com/wp-content/uploads/2026/07/john-calvin-institutes-of-the-christian-religion.pdf</text:a></text:p>
      <text:p text:style-name="Standard"/>
      <text:p text:style-name="Horizontal_20_Line"/>
      <text:p text:style-name="Quotations">The Institutes of the Christian Religion CHAPTER 3.</text:p>
      <text:p text:style-name="Quotations">OF THE TEACHERS AND MINISTERS OF THE CHURCH. THEIR ELECTION AND</text:p>
      <text:p text:style-name="P43">OFFICE.</text:p>
      <text:p text:style-name="P43">...</text:p>
      <text:p text:style-name="Quotations">4. Second part of the chapter, treating of Ecclesiastical office-bearers in particular. Some</text:p>
      <text:p text:style-name="Quotations">of them, as <text:span text:style-name="T38">Apostles, Prophets, and Evangelists, temporary</text:span>. Others, as Pastors and Teachers,</text:p>
      <text:p text:style-name="Quotations">perpetual and indispensable.</text:p>
      <text:p text:style-name="Quotations">5. Considering the office of Evangelist and Apostle as one, we have Pastors corresponding</text:p>
      <text:p text:style-name="Quotations">with Apostles, and Teachers with Prophets. <text:span text:style-name="T38">Why the name of Apostles specially conferred</text:span></text:p>
      <text:p text:style-name="P44">on the twelve.</text:p>
      <text:p text:style-name="Quotations">…</text:p>
      <text:p text:style-name="P45">4. Those who preside over the government of the Church, according to the institution of Christ, are named by Paul, first, Apostles; secondly, Prophets; thirdly, Evangelists; fourthly, Pastors; and, lastly, Teachers (<text:span text:style-name="T11">Eph. 4:11</text:span>). <text:span text:style-name="T38">Of these, only the two last have an ordinary office in the Church</text:span>. <text:span text:style-name="T38">The Lord raised up the other three at the beginning of his kingdom, and still occasionally raises them up when the necessity of the times requires</text:span>. <text:span text:style-name="T38">The nature of the apostolic function is clear from the command, “</text:span><text:span text:style-name="T39">Go ye into all the world, and preach the Gospel to every creature</text:span><text:span text:style-name="T38">”</text:span> (<text:span text:style-name="T11">Mark 16:15</text:span>). No fixed limits are given them, but the whole world is assigned to be reduced under the obedience of Christ, that by spreading the Gospel as widely as they could, they might everywhere erect his kingdom. Accordingly, Paul, when he would approve his apostleship, does not say that he had acquired some one city for Christ, but had propagated the Gospel far and wide—had not built on another man’s foundation, but planted churches where the name of his Lord was unheard. The apostles, therefore, were sent forth to bring back the world from its revolt to the true obedience of God, and everywhere establish his kingdom by the preaching of the Gospel; or, if you choose, they were like the first architects of the Church, to lay its foundations throughout the world. By <text:span text:style-name="T38">Prophets</text:span>, he means not all interpreters of the divine will, but those who excelled by special revelation; <text:span text:style-name="T38">none such now exist, or they are less manifest</text:span>. By Evangelists, I mean those who, while inferior in rank to the apostles, were next them in office, and even acted as their substitutes. Such were Luke, Timothy, Titus, and the like; perhaps, also, the seventy disciples whom our Saviour appointed in the second place to the apostles (<text:span text:style-name="T11">Luke 10:1</text:span>). According to this interpretation, which appears to me consonant both to the words and the meaning of Paul, <text:span text:style-name="T38">those three functions were not instituted in the Church to be perpetual</text:span>, but only to endure so long as churches were to be formed where none previously existed, or at least where churches were to be transferred from Moses to Christ; <text:span text:style-name="T38">although I deny not, that afterward God occasionally raised up Apostles, or at least Evangelists, in their stead, as has been done in our time</text:span>. For such were needed to bring back the Church from the revolt of Antichrist. <text:span text:style-name="T38">The office I nevertheless call extraordinary, because it has no place in churches duly constituted</text:span>. Next come Pastors and Teachers, with whom the Church never can dispense, and between whom, <text:span text:style-name="T38">I think, there is this difference, that teachers preside not over discipline, or the administration of the sacraments, or admonitions, or exhortations, but the interpretation of Scripture only</text:span>, in order that pure and sound doctrine may be maintained among believers. But all these are embraced in the pastoral office.</text:p>
      <text:h text:style-name="P1" text:outline-level="2"><text:soft-page-break/>Grammar matters</text:h>
      <text:p text:style-name="Standard"/>
      <text:p text:style-name="P46"/>
      <table:table table:name="Table20" table:style-name="Table20">
        <table:table-column table:style-name="Table20.A"/>
        <table:table-row>
          <table:table-cell table:style-name="Table20.A1" office:value-type="string">
            <text:p text:style-name="P47">Mark 1:16-17</text:p>
            <text:p text:style-name="Table_20_Contents"><text:span text:style-name="T40">16</text:span> Now as he wa<text:span text:style-name="T41">lked by the sea of Galilee, he saw </text:span><text:span text:style-name="T38">Simon and Andrew</text:span><text:span text:style-name="T41"> his brother casting a net into the sea: for </text:span><text:span text:style-name="T38">they</text:span><text:span text:style-name="T41"> were fishers.</text:span></text:p>
            <text:p text:style-name="P48"><text:span text:style-name="T40">17</text:span> And Jesus said unto <text:span text:style-name="T38">them</text:span>, <text:span text:style-name="T42">Come </text:span><text:span text:style-name="T39">ye</text:span><text:span text:style-name="T42"> after me, and I will make </text:span><text:span text:style-name="T39">you</text:span><text:span text:style-name="T42"> to become fishers of men.</text:span></text:p>
          </table:table-cell>
        </table:table-row>
      </table:table>
      <text:p text:style-name="P49"/>
      <text:p text:style-name="P50"><text:span text:style-name="T43">C</text:span>ore word types</text:p>
      <text:p text:style-name="P51"/>
      <text:list text:style-name="L4">
        <text:list-item>
          <text:p text:style-name="P52"><text:span text:style-name="T14">Noun</text:span>: a naming word. It identifies a specific person, place, thing, or idea.</text:p>
        </text:list-item>
      </text:list>
      <text:p text:style-name="P53"/>
      <text:p text:style-name="P53"><text:span text:style-name="T32">Example</text:span><text:span text:style-name="T44">s</text:span>: Simon, Andrew, sea, net</text:p>
      <text:p text:style-name="Standard"/>
      <text:list text:style-name="L5">
        <text:list-item>
          <text:p text:style-name="P54"><text:span text:style-name="T14">Pronoun</text:span>: a replacement word. It is a shortcut word used to stand in for a noun so you don’t have to keep repeating the same name.</text:p>
        </text:list-item>
      </text:list>
      <text:p text:style-name="Standard"/>
      <text:p text:style-name="P53"><text:span text:style-name="T32">Example</text:span><text:span text:style-name="T44">s</text:span>: <text:span text:style-name="T45">he, his, they, them, ye, I, you</text:span></text:p>
      <text:p text:style-name="Standard"/>
      <text:list text:style-name="L6">
        <text:list-item>
          <text:p text:style-name="P55"><text:span text:style-name="T14">Antecedent</text:span>: The “anchor” word. It is the original noun, <text:span text:style-name="T46">noun phrase, </text:span><text:span text:style-name="T47">or pronoun </text:span>that a pronoun refers back to <text:span text:style-name="T48">(backwards; to the nearest).</text:span></text:p>
        </text:list-item>
      </text:list>
      <text:p text:style-name="P51"/>
      <text:p text:style-name="P56"><text:span text:style-name="T32">Examples</text:span>: <text:s/><text:span text:style-name="T49">Simon and Andrew ← </text:span><text:span text:style-name="T50">they ← them ← ye ← you</text:span></text:p>
      <text:p text:style-name="P57"><text:s text:c="19"/><text:span text:style-name="T50">Jesus ← me ← I</text:span></text:p>
      <text:p text:style-name="Standard"/>
      <text:p text:style-name="P58">Now you might wonder, why is the antecedent for <text:span text:style-name="T49">the pronoun </text:span>“them” <text:span text:style-name="T49">the pronoun </text:span>“they” instead of <text:span text:style-name="T49">the original nouns </text:span>“Simon and Andrew”? That’s because if multiple pronouns are used, <text:span text:style-name="T51">each pronoun points </text:span><text:span text:style-name="T52">back</text:span><text:span text:style-name="T51"> to the </text:span><text:span text:style-name="T52">nearest</text:span><text:span text:style-name="T51"> </text:span><text:span text:style-name="T53">appropriate </text:span><text:span text:style-name="T51">pronoun </text:span><text:span text:style-name="T53">forming what is called a</text:span><text:span text:style-name="T51"> </text:span>“co-reference chain” (or anaphoric chain).</text:p>
      <text:p text:style-name="P59"/>
      <text:p text:style-name="Horizontal_20_Line"/>
      <text:p text:style-name="P60">In English grammar, a pronoun <text:span text:style-name="T14">must</text:span> agree with its antecedent in both <text:span text:style-name="T29">number</text:span> (singular or plural) and <text:span text:style-name="T29">gender</text:span> (masculine, feminine, or neuter).</text:p>
      <text:p text:style-name="P60"/>
      <text:p text:style-name="P60"><text:span text:style-name="T54">Understanding how </text:span><text:span text:style-name="T55">pronouns</text:span><text:span text:style-name="T54"> resolve to their </text:span><text:span text:style-name="T55">antecedents</text:span><text:span text:style-name="T54"> clarifies passages where multiple </text:span><text:span text:style-name="T55">nouns</text:span><text:span text:style-name="T54"> function as a </text:span><text:span text:style-name="T55">single semantic unit</text:span> like in the following example.</text:p>
      <text:p text:style-name="Standard"/>
      <table:table table:name="Table9" table:style-name="Table9">
        <table:table-column table:style-name="Table9.A"/>
        <table:table-row>
          <table:table-cell table:style-name="Table9.A1" office:value-type="string">
            <text:p text:style-name="P61">Daniel 4:13-14</text:p>
            <text:p text:style-name="Standard"><text:span text:style-name="T40">13</text:span> I saw in the visions of my head upon my bed, and, behold, <text:span text:style-name="T38">a watcher and an holy one</text:span> came down from heaven;</text:p>
            <text:p text:style-name="Standard"><text:span text:style-name="T40">14</text:span> <text:span text:style-name="T38">He</text:span> cried aloud, and said thus, Hew down the tree, and cut off his branches, shake off his leaves, and scatter his fruit: let the beasts get away from under it, and the fowls from his branches:</text:p>
          </table:table-cell>
        </table:table-row>
      </table:table>
      <text:p text:style-name="P62"/>
      <text:p text:style-name="Standard"><text:span text:style-name="T56">The word “</text:span><text:span text:style-name="T57">He</text:span><text:span text:style-name="T58">”</text:span><text:span text:style-name="T56"> in verse 14 is a </text:span><text:span text:style-name="T59">singular</text:span><text:span text:style-name="T56"> pronoun. While the nearest preceding noun phrase is “</text:span><text:span text:style-name="T57">an holy one</text:span><text:span text:style-name="T58">”, </text:span><text:span text:style-name="T56">it is joined to “</text:span><text:span text:style-name="T57">a watcher</text:span><text:span text:style-name="T60">”</text:span><text:span text:style-name="T56"> by the conjunction </text:span><text:span text:style-name="T60">“</text:span><text:span text:style-name="T57">and</text:span><text:span text:style-name="T60">”</text:span>.</text:p>
      <text:p text:style-name="P63"/>
      <text:p text:style-name="Standard"><text:span text:style-name="T56">Normally, two nouns joined by "</text:span><text:span text:style-name="T61">and</text:span><text:span text:style-name="T56">" create a </text:span><text:span text:style-name="T59">plural</text:span><text:span text:style-name="T56"> subject (which would </text:span><text:span text:style-name="T60">require</text:span><text:span text:style-name="T56"> the pronoun "</text:span><text:span text:style-name="T62">they</text:span><text:span text:style-name="T56">"). However, because the text uses the </text:span><text:span text:style-name="T59">singular</text:span><text:span text:style-name="T56"> pronoun “</text:span><text:span text:style-name="T57">He</text:span><text:span text:style-name="T60">”, the </text:span><text:span text:style-name="T59">compound</text:span><text:span text:style-name="T60"> phrase “</text:span><text:span text:style-name="T57">a watcher and an holy one</text:span><text:span text:style-name="T60">” is forced to function as a </text:span><text:span text:style-name="T59">single semantic unit</text:span><text:span text:style-name="T60">. This grammatical structure is known as </text:span><text:span text:style-name="T63">semantically singular coordination</text:span> (or singular coordinate subject) and i<text:span text:style-name="T60">t proves that "</text:span><text:span text:style-name="T57">a watcher</text:span><text:span text:style-name="T60">" and "</text:span><text:span text:style-name="T57">an holy one</text:span><text:span text:style-name="T60">" are not two separate entities, but rather two titles describing the same individual.</text:span></text:p>
      <text:h text:style-name="P64" text:outline-level="2"><text:soft-page-break/>Determiners in Scripture</text:h>
      <text:p text:style-name="Standard"/>
      <text:p text:style-name="Standard">A <text:span text:style-name="T29">determiner</text:span> is a word placed before a noun to clarify what the noun refers to. In <text:span text:style-name="T64">B</text:span>iblical English, the most common determiners you will encounter are:</text:p>
      <text:p text:style-name="Standard"/>
      <text:list text:style-name="L7">
        <text:list-item>
          <text:p text:style-name="P65"><text:span text:style-name="T29">Articles:</text:span> <text:span text:style-name="T1">the</text:span> (definite), <text:span text:style-name="T1">a</text:span>, <text:span text:style-name="T1">an</text:span> (both indefinite)</text:p>
        </text:list-item>
        <text:list-item>
          <text:p text:style-name="P65"><text:span text:style-name="T29">Possessive Pronouns:</text:span> <text:span text:style-name="T1">his</text:span>, <text:span text:style-name="T1">my</text:span>, <text:span text:style-name="T1">thy</text:span>, <text:span text:style-name="T1">their</text:span>, <text:span text:style-name="T1">your</text:span></text:p>
        </text:list-item>
        <text:list-item>
          <text:p text:style-name="P65"><text:span text:style-name="T29">Demonstratives:</text:span> <text:span text:style-name="T1">these</text:span>, <text:span text:style-name="T1">those</text:span></text:p>
        </text:list-item>
      </text:list>
      <text:p text:style-name="Standard"/>
      <text:p text:style-name="P66"><text:span text:style-name="T14">Rule 1</text:span>: <text:span text:style-name="T14">The Single-Determiner Rule</text:span> (<text:span text:style-name="T65">s</text:span>yntactic <text:span text:style-name="T65">u</text:span>nity)</text:p>
      <text:p text:style-name="Standard"/>
      <text:p text:style-name="Standard">When two or more nouns are joined by a conjunction (like and), but are preceded by only <text:span text:style-name="T14">one single determiner</text:span> at the very beginning of the phrase, that determiner <text:span text:style-name="T14">distributes across all the nouns</text:span>. This syntactically binds them together into a <text:span text:style-name="T14">single compound category</text:span> or <text:span text:style-name="T66">semantic</text:span> unit.</text:p>
      <text:p text:style-name="Standard"/>
      <text:p text:style-name="Standard"><text:span text:style-name="T32">Example</text:span>: <text:span text:style-name="T11">Ephesians 2:20</text:span></text:p>
      <text:p text:style-name="Standard"/>
      <text:p text:style-name="Quotations">"<text:span text:style-name="T32">...built upon the foundation of </text:span><text:span text:style-name="T67">the</text:span><text:span text:style-name="T32"> apostles and prophets...</text:span>"</text:p>
      <text:p text:style-name="Standard"/>
      <text:list text:style-name="L8">
        <text:list-item>
          <text:p text:style-name="P67"><text:span text:style-name="T14">The Syntax</text:span>: The single article "the" stands at the front. It is not repeated before "prophets" ("<text:span text:style-name="T14">the</text:span> apostles and <text:span text:style-name="T14">the</text:span> prophets").</text:p>
        </text:list-item>
        <text:list-item>
          <text:p text:style-name="P67"><text:span text:style-name="T14">The Meaning</text:span>: Because there is only one determiner, "apostles and prophets" are grammatically locked together as a single, inseparable functional class. What happens to one must happen to the other.</text:p>
        </text:list-item>
      </text:list>
      <text:p text:style-name="Standard"/>
      <text:p text:style-name="P66"><text:span text:style-name="T14">Rule 2</text:span>: <text:span text:style-name="T14">Repeated Determiners</text:span> (<text:span text:style-name="T65">g</text:span>rammatical <text:span text:style-name="T65">s</text:span>eparation)</text:p>
      <text:p text:style-name="Standard"/>
      <text:p text:style-name="Standard">When each noun in a list is preceded by its own <text:span text:style-name="T14">individual</text:span> determiner, the syntax explicitly breaks the connection between them. It establishes that the items are <text:span text:style-name="T14">distinct</text:span>, <text:span text:style-name="T14">independent groups</text:span> that do not share the same boundaries, classification, or timeline.</text:p>
      <text:p text:style-name="Standard"/>
      <text:p text:style-name="Standard"><text:span text:style-name="T32">Contrast</text:span>: <text:span text:style-name="T11">Joel 2:25</text:span> vs. Joint Lists</text:p>
      <text:p text:style-name="Standard"/>
      <text:p text:style-name="Quotations">"And I will restore to you the years that <text:span text:style-name="T14">the</text:span> locust hath eaten, <text:span text:style-name="T14">the</text:span> cankerworm, and <text:span text:style-name="T14">the</text:span> caterpiller, and <text:span text:style-name="T14">the</text:span> palmerworm…"</text:p>
      <text:p text:style-name="Standard"/>
      <text:list text:style-name="L9">
        <text:list-item>
          <text:p text:style-name="P68"><text:span text:style-name="T14">The Syntax</text:span>: The definite article "the" is repeated before every single noun: <text:span text:style-name="T14">the</text:span> locust, <text:span text:style-name="T14">the</text:span> cankerworm, <text:span text:style-name="T14">the</text:span> caterpiller, <text:span text:style-name="T14">the</text:span> palmerworm. </text:p>
        </text:list-item>
        <text:list-item>
          <text:p text:style-name="P68"><text:span text:style-name="T14">The Meaning</text:span>: By repeating the determiner, the text grammatically <text:span text:style-name="T14">separates</text:span> these creatures. They are not a single compound category; they are four <text:span text:style-name="T14">distinct</text:span> <text:span text:style-name="T68">groups</text:span>.</text:p>
        </text:list-item>
      </text:list>
      <text:p text:style-name="Standard"/>
      <text:p text:style-name="Standard">If the text had read, "<text:span text:style-name="T14">the</text:span> locust, cankerworm, caterpiller, and palmerworm," <text:span text:style-name="T69">then </text:span>they would be bound as a <text:span text:style-name="T14">single</text:span>, collective unit of destruction. But, by repeating "the", the grammar keeps them <text:span text:style-name="T14">strictly separate</text:span>.</text:p>
      <text:p text:style-name="Standard"/>
      <text:p text:style-name="Standard"><text:span text:style-name="T70">Application: </text:span><text:span text:style-name="T11">Ephesians 3:5</text:span></text:p>
      <text:p text:style-name="Standard"/>
      <text:p text:style-name="Quotations">"<text:span text:style-name="T32">...revealed unto </text:span><text:span text:style-name="T67">his</text:span><text:span text:style-name="T32"> holy apostles and prophets...</text:span>"</text:p>
      <text:p text:style-name="Standard"/>
      <text:p text:style-name="Standard">Because "his" is a <text:span text:style-name="T14">single possessive determiner</text:span> governing both plural nouns, they are a single unit. To make them distinct groups, the text would have to repeat the determiner, reading: "<text:span text:style-name="T14">his</text:span> holy apostles and <text:span text:style-name="T14">his</text:span> prophets." Because the <text:span text:style-name="T71">text </text:span>does not do this, the two groups are grammatically inseparable.</text:p>
      <text:p text:style-name="P66"><text:soft-page-break/><text:span text:style-name="T14">Rule 3</text:span>: <text:span text:style-name="T72">The three methods of syntactic separation</text:span></text:p>
      <text:p text:style-name="Standard"/>
      <text:p text:style-name="Standard">Apart from repeating determiners, there are three primary syntactic ways Scripture demonstrates that two groups in a list are distinct and separate classes rather than a single unified class:</text:p>
      <text:p text:style-name="Standard"/>
      <text:h text:style-name="P69" text:outline-level="4">A. Non-Distributive Modifiers</text:h>
      <text:p text:style-name="Standard">If an adjective, descriptive modifier, <text:span text:style-name="T73">or direct address pronoun</text:span> is placed immediately before the first noun but cannot logically or grammatically apply to the second noun, the two groups are <text:span text:style-name="T14">separated</text:span>.</text:p>
      <text:p text:style-name="Standard"/>
      <text:p text:style-name="Standard"><text:span text:style-name="T70">Example</text:span>: <text:span text:style-name="T11">Revelation 18:20</text:span></text:p>
      <text:p text:style-name="P61"/>
      <text:list text:style-name="L10">
        <text:list-header>
          <text:p text:style-name="P70">"Rejoice over her, thou heaven, and <text:span text:style-name="T29">ye</text:span> holy apostles and prophets..."</text:p>
        </text:list-header>
        <text:list-item>
          <text:p text:style-name="P71"><text:span text:style-name="T29">The Syntax:</text:span> The direct address pronoun <text:span text:style-name="T29">"ye"</text:span> acts as a localized pointer. The adjective <text:span text:style-name="T29">"holy"</text:span> is grammatically tied directly to "apostles" and does not distribute past the conjunction to "prophets." It reads structurally as: <text:span text:style-name="T1">"[ye holy apostles] and [prophets]."</text:span> Because "prophets" does not receive the modifier "holy," the grammar treats them as <text:span text:style-name="T14">two distinct groups</text:span> addressed side-by-side.</text:p>
        </text:list-item>
      </text:list>
      <text:p text:style-name="Standard"/>
      <text:h text:style-name="P69" text:outline-level="4">B. Repeated Prepositions</text:h>
      <text:p text:style-name="Standard">A preposition is a word (<text:span text:style-name="T1">of</text:span>, <text:span text:style-name="T1">by</text:span>, <text:span text:style-name="T1">to</text:span>, <text:span text:style-name="T1">with</text:span>) that shows the relationship—such as origin, direction, or position—between a noun and other words in a sentence. When a preposition is repeated before each noun in a list, it breaks the structural unity of the phrase. The repetition establishes that each noun is the object of its own distinct relationship or action, rather than sharing a single, joint relationship.</text:p>
      <text:p text:style-name="Standard"/>
      <text:p text:style-name="P72"><text:span text:style-name="T32">Example</text:span>: <text:span text:style-name="T11">1 Thessalonians 1:5</text:span></text:p>
      <text:list text:style-name="L11">
        <text:list-header>
          <text:p text:style-name="P73">"For our gospel came not unto you in word only, but also <text:span text:style-name="T29">in</text:span> power, and <text:span text:style-name="T29">in</text:span> the Holy Ghost, and <text:span text:style-name="T29">in</text:span> much assurance..."</text:p>
        </text:list-header>
        <text:list-item>
          <text:p text:style-name="P74"><text:span text:style-name="T29">The Syntax:</text:span> The preposition <text:span text:style-name="T74">"in"</text:span> is repeated before <text:span text:style-name="T14">every</text:span> noun.</text:p>
        </text:list-item>
        <text:list-item>
          <text:p text:style-name="P74"><text:span text:style-name="T29">The Meaning:</text:span> The repetition of <text:span text:style-name="T74">"in"</text:span> separates these three elements into <text:span text:style-name="T14">distinct</text:span>, independent characteristics of how the <text:span text:style-name="T75">g</text:span>ospel came to them.</text:p>
        </text:list-item>
      </text:list>
      <text:p text:style-name="Standard"/>
      <text:h text:style-name="P75" text:outline-level="4">C. Pronominal Separation (<text:span text:style-name="T76">s</text:span>ymmetric <text:span text:style-name="T76">p</text:span>ronoun <text:span text:style-name="T76">p</text:span>lacement)</text:h>
      <text:p text:style-name="Standard">When pronouns <text:span text:style-name="T77">(</text:span><text:span text:style-name="T78">his</text:span><text:span text:style-name="T77">, </text:span><text:span text:style-name="T78">m</text:span><text:span text:style-name="T79">y</text:span><text:span text:style-name="T80">, </text:span><text:span text:style-name="T78">their</text:span><text:span text:style-name="T77">) </text:span>or articles <text:span text:style-name="T77">(</text:span><text:span text:style-name="T78">the</text:span><text:span text:style-name="T77">, </text:span><text:span text:style-name="T78">a</text:span><text:span text:style-name="T77">, </text:span><text:span text:style-name="T78">an</text:span><text:span text:style-name="T77">) </text:span>are used as possessives or direct markers, placing them symmetrically before each group explicitly <text:span text:style-name="T14">isolates</text:span> each class.</text:p>
      <text:p text:style-name="Standard"/>
      <text:p text:style-name="Standard"><text:span text:style-name="T32">Example</text:span>: <text:span text:style-name="T81">Luke 24:39</text:span></text:p>
      <text:p text:style-name="Standard"/>
      <text:p text:style-name="P76">"...<text:span text:style-name="T82">behold </text:span><text:span text:style-name="T83">my</text:span><text:span text:style-name="T82"> hands and </text:span><text:span text:style-name="T83">my</text:span><text:span text:style-name="T82"> feet, that it is I myself</text:span>..."</text:p>
      <text:list text:style-name="L12">
        <text:list-item>
          <text:p text:style-name="P77"><text:span text:style-name="T29">The Syntax:</text:span> Instead of grouping the appendages under a single possessive pronoun (e.g., "my hands and feet"), the possessive pronoun <text:span text:style-name="T84">repeats </text:span>before each <text:span text:style-name="T84">individual </text:span>noun.</text:p>
        </text:list-item>
      </text:list>
      <text:list text:style-name="L13">
        <text:list-item>
          <text:p text:style-name="P78"><text:span text:style-name="T29">The Meaning:</text:span> This symmetrical placement explicitly isolates each category</text:p>
        </text:list-item>
      </text:list>
      <text:p text:style-name="Horizontal_20_Line"/>
      <text:p text:style-name="P79"><text:span text:style-name="T85">The vast majority of “I think it means…” misunderstandings when interpreting Scripture can be attributed to a misunderstanding of English grammar. The rules reviewed here are only the basic required to understand all the points made in this study. </text:span><text:span text:style-name="T86">Y</text:span><text:span text:style-name="T85">ou are encouraged to </text:span><text:span text:style-name="T87">not only add to this knowledge but also apply it elsewhere in Scripture because it will be an indispensable aid for rightly dividing the word of truth.</text:span></text:p>
      <text:h text:style-name="P1" text:outline-level="2"><text:soft-page-break/>Parallelisms <text:span text:style-name="T88">in the Bible</text:span></text:h>
      <text:p text:style-name="Standard"/>
      <table:table table:name="Table15" table:style-name="Table15">
        <table:table-column table:style-name="Table15.A"/>
        <table:table-column table:style-name="Table15.B"/>
        <table:table-row>
          <table:table-cell table:style-name="Table15.A1" office:value-type="string">
            <text:p text:style-name="P80">Type</text:p>
          </table:table-cell>
          <table:table-cell table:style-name="Table15.B1" office:value-type="string">
            <text:p text:style-name="P80">Examples</text:p>
          </table:table-cell>
        </table:table-row>
        <table:table-row>
          <table:table-cell table:style-name="Table15.A2" office:value-type="string">
            <text:p text:style-name="P81">Direct <text:span text:style-name="T89">equivalence / </text:span><text:span text:style-name="T90">direct structural</text:span></text:p>
          </table:table-cell>
          <table:table-cell table:style-name="Table15.B2" office:value-type="string">
            <text:p text:style-name="P82"><text:span text:style-name="T91">Gen 4:23</text:span> (<text:span text:style-name="T92">synonymous parallelism; </text:span><text:span text:style-name="T93">Hebrew poetry</text:span>)</text:p>
            <text:p text:style-name="P83"><text:span text:style-name="T11">Jdg 18:17-18 </text:span><text:span text:style-name="T94">(“graven image” </text:span><text:span text:style-name="T95">&amp;</text:span><text:span text:style-name="T94"> “carved image”)</text:span></text:p>
            <text:p text:style-name="P84"><text:span text:style-name="T11">Deu 32:2</text:span> (symmetrical structural equivalence)</text:p>
          </table:table-cell>
        </table:table-row>
        <table:table-row>
          <table:table-cell table:style-name="Table15.A2" office:value-type="string">
            <text:p text:style-name="P85">Conceptual substitution</text:p>
            <text:p text:style-name="P86">(one idea is substituted for another)</text:p>
          </table:table-cell>
          <table:table-cell table:style-name="Table15.B2" office:value-type="string">
            <text:p text:style-name="P87"><text:span text:style-name="T11">Gen 1:8 </text:span>(firmament <text:span text:style-name="T95">&amp;</text:span><text:span text:style-name="T96"> </text:span>heaven), <text:span text:style-name="T97">Gen 1:10</text:span><text:span text:style-name="T98">, </text:span><text:span text:style-name="T99">Psa 119:105</text:span></text:p>
          </table:table-cell>
        </table:table-row>
        <table:table-row>
          <table:table-cell table:style-name="Table15.A2" office:value-type="string">
            <text:p text:style-name="P88">Synonymous</text:p>
            <text:p text:style-name="P87">(two different phrases that convey the same idea)</text:p>
          </table:table-cell>
          <table:table-cell table:style-name="Table15.B2" office:value-type="string">
            <text:p text:style-name="P89"><text:span text:style-name="T100">Job 3:11</text:span><text:span text:style-name="T101">, </text:span><text:span text:style-name="T100">Psa 120:2</text:span>,<text:span text:style-name="T100"> </text:span><text:span text:style-name="T102">Psa 19:1</text:span>, <text:span text:style-name="T102">Pro 16:18</text:span>, <text:span text:style-name="T102">Isa 55:6</text:span></text:p>
          </table:table-cell>
        </table:table-row>
        <table:table-row>
          <table:table-cell table:style-name="Table15.A2" office:value-type="string">
            <text:p text:style-name="P90">Antithetic</text:p>
            <text:p text:style-name="P90">(contrasting opposites)</text:p>
          </table:table-cell>
          <table:table-cell table:style-name="Table15.B2" office:value-type="string">
            <text:p text:style-name="Standard"><text:span text:style-name="T103">Pro 10:1</text:span><text:span text:style-name="T104">, </text:span><text:span text:style-name="T103">Psa 1:6</text:span>, <text:span text:style-name="T105">Pro 15:1</text:span><text:span text:style-name="T106">, </text:span><text:span text:style-name="T105">Pro 14:34</text:span><text:span text:style-name="T106">, </text:span><text:span text:style-name="T105">Isa 54:7</text:span></text:p>
          </table:table-cell>
        </table:table-row>
        <table:table-row>
          <table:table-cell table:style-name="Table15.A2" office:value-type="string">
            <text:p text:style-name="P91">Synthetic / Constructive</text:p>
            <text:p text:style-name="P91">(one <text:span text:style-name="T67">phrase</text:span> builds upon another)</text:p>
          </table:table-cell>
          <table:table-cell table:style-name="Table15.B2" office:value-type="string">
            <text:p text:style-name="P92"><text:span text:style-name="T107">Psa 23:1</text:span><text:span text:style-name="T108">, </text:span><text:span text:style-name="T107">Pro 4:23</text:span>,<text:span text:style-name="T107"> </text:span><text:span text:style-name="T109">Eph 2:21-22</text:span></text:p>
          </table:table-cell>
        </table:table-row>
        <table:table-row>
          <table:table-cell table:style-name="Table15.A2" office:value-type="string">
            <text:p text:style-name="P91">Synthetic / Constructive / <text:span text:style-name="T110">Hendiadys</text:span></text:p>
            <text:p text:style-name="P91">(one <text:span text:style-name="T111">word</text:span> builds upon another)</text:p>
          </table:table-cell>
          <table:table-cell table:style-name="Table15.B2" office:value-type="string">
            <text:p text:style-name="P92"><text:span text:style-name="T107">Gen 19:24</text:span><text:span text:style-name="T108"> ("brimstone and fire")</text:span></text:p>
            <text:p text:style-name="P93"><text:span text:style-name="T11">2Sa 20:19</text:span> (“a city and a mother”)</text:p>
            <text:p text:style-name="P94"><text:span text:style-name="T11">Luk 21:15</text:span> (“mouth and wisdom”)</text:p>
            <text:p text:style-name="P94"><text:span text:style-name="T11">Acts 14:13</text:span> (“oxen and garlands”)</text:p>
            <text:p text:style-name="P95"><text:span text:style-name="T11">Acts 23:6</text:span> (“hope and resurrection”)</text:p>
            <text:p text:style-name="P96"><text:span text:style-name="T11">Col 2:8</text:span> (“philosophy and vain deceit”)</text:p>
            <text:p text:style-name="P96"><text:span text:style-name="T11">2Ti 1:10</text:span> (“life and immortality”)</text:p>
            <text:p text:style-name="P96"><text:span text:style-name="T11">Jam 5:10</text:span> (“suffering affliction, and of patience”)</text:p>
          </table:table-cell>
        </table:table-row>
        <table:table-row>
          <table:table-cell table:style-name="Table15.A2" office:value-type="string">
            <text:p text:style-name="P97">Emblematic</text:p>
            <text:p text:style-name="P97">(an emblem, figure, simile or analogy is used to illustrate a spiritual, moral, or literal reality)</text:p>
          </table:table-cell>
          <table:table-cell table:style-name="Table15.B2" office:value-type="string">
            <text:p text:style-name="P92"><text:span text:style-name="T112">Psa 42:1</text:span><text:span text:style-name="T113">, </text:span><text:span text:style-name="T112">Pro 11:22</text:span>, <text:span text:style-name="T114">Psa 103:13</text:span>, <text:span text:style-name="T114">Pro 25:25</text:span>, <text:span text:style-name="T114">Pro 26:1</text:span></text:p>
          </table:table-cell>
        </table:table-row>
        <table:table-row>
          <table:table-cell table:style-name="Table15.A2" office:value-type="string">
            <text:p text:style-name="P98">Climactic / Staircase</text:p>
            <text:p text:style-name="P98">(the second phrase repeats a phrase or clause <text:span text:style-name="T115">and</text:span> adds to it)</text:p>
          </table:table-cell>
          <table:table-cell table:style-name="Table15.B2" office:value-type="string">
            <text:p text:style-name="Standard"><text:span text:style-name="T116">Psa 29:1-2</text:span>, <text:span text:style-name="T117">Psa 93:3</text:span><text:span text:style-name="T118">, </text:span><text:span text:style-name="T117">Psa 121:1-2</text:span></text:p>
          </table:table-cell>
        </table:table-row>
        <table:table-row table:style-name="Table15.10">
          <table:table-cell table:style-name="Table15.A2" office:value-type="string">
            <text:p text:style-name="P99">Chiastic / Inverted</text:p>
            <text:p text:style-name="P99">(a phrase is <text:span text:style-name="T119">ideologically </text:span>repeated in reverse order)</text:p>
          </table:table-cell>
          <table:table-cell table:style-name="Table15.B2" office:value-type="string">
            <text:p text:style-name="Standard"><text:span text:style-name="T120">Gen 9:6</text:span>, <text:span text:style-name="T121">Mat 19:30</text:span><text:span text:style-name="T122">, </text:span><text:span text:style-name="T121">Mat 23:12</text:span><text:span text:style-name="T122">, </text:span><text:span text:style-name="T121">Isa 55:8</text:span></text:p>
          </table:table-cell>
        </table:table-row>
      </table:table>
      <text:p text:style-name="P100"/>
      <table:table table:name="Table8" table:style-name="Table8">
        <table:table-column table:style-name="Table8.A"/>
        <table:table-row>
          <table:table-cell table:style-name="Table8.A1" office:value-type="string">
            <text:p text:style-name="P101"><text:span text:style-name="T14">Hendiadys</text:span> (plural <text:span text:style-name="T32">Hendiadyoin</text:span>)</text:p>
            <text:p text:style-name="P102">/henˈdīədəs/</text:p>
            <text:p text:style-name="P102"><text:line-break/><text:span text:style-name="T123">A h</text:span>endiadys is a figure of speech where a single, complex idea is expressed by joining two words together with a conjunction (like "and") instead of using a modifier. <text:span text:style-name="T123">Its name is d</text:span>erived from the Greek phrase hen-dia-dyoin ("one through two"), it gives a thought more emphasis or poetic force.</text:p>
            <text:p text:style-name="P102"/>
            <text:p text:style-name="P102">Common Examples:</text:p>
            <text:list text:style-name="L14">
              <text:list-item>
                <text:p text:style-name="P103">“<text:span text:style-name="T123">Nice and warm” instead of “pleasantly warm”</text:span></text:p>
              </text:list-item>
              <text:list-item>
                <text:p text:style-name="P103">“<text:span text:style-name="T123">Good and ready” instead of “completely ready”</text:span></text:p>
              </text:list-item>
              <text:list-item>
                <text:p text:style-name="P103">“<text:span text:style-name="T123">Sick and Tired” instead of “exceedingly tired” or “deeply frustrated”</text:span></text:p>
              </text:list-item>
              <text:list-item>
                <text:p text:style-name="P104">“Try and do it” instead of “try to do it”</text:p>
              </text:list-item>
              <text:list-item>
                <text:p text:style-name="P104">“<text:span text:style-name="T124">The birds and the bees” instead of “the reproductive facts of </text:span><text:span text:style-name="T125">a single species</text:span><text:span text:style-name="T124">”</text:span></text:p>
              </text:list-item>
            </text:list>
          </table:table-cell>
        </table:table-row>
      </table:table>
      <text:p text:style-name="P105"/>
      <text:p text:style-name="P94">Hendiadyoin can most easily be recognized because one word modifies the other and they are both joined by “and”. For example, in <text:span text:style-name="T11">Gen 3:16</text:span> “<text:span text:style-name="T32">thy sorrow and thy conception</text:span>”. <text:span text:style-name="T126">God did not multiple two separate things. Instead, it could be understood as </text:span>“thy conception-sorrow”.</text:p>
      <text:h text:style-name="P1" text:outline-level="2"><text:soft-page-break/><text:span text:style-name="T127">The twelve </text:span><text:span text:style-name="T128">apostles</text:span></text:h>
      <text:p text:style-name="P106">(“the twelve” <text:span text:style-name="T129">&amp; </text:span>“the twelve apostles of the Lamb”)</text:p>
      <text:p text:style-name="Standard"/>
      <table:table table:name="Table1" table:style-name="Table1">
        <table:table-column table:style-name="Table1.A"/>
        <table:table-row>
          <table:table-cell table:style-name="Table1.A1" office:value-type="string">
            <text:p text:style-name="P47">Matthew 10:2</text:p>
            <text:p text:style-name="Table_20_Contents">Now the names of <text:span text:style-name="T38">the twelve apostles</text:span><text:span text:style-name="T40">G652</text:span> are these; The first, Simon, who is called Peter, and Andrew his brother; James the son of Zebedee, and John his brother;</text:p>
            <text:p text:style-name="Table_20_Contents"/>
            <text:p text:style-name="P47">Mark 6:30</text:p>
            <text:p text:style-name="P107">And <text:span text:style-name="T38">the apostles</text:span><text:span text:style-name="T40">G652</text:span> gathered themselves together unto Jesus, and told him all things, both what they had done, and what they had taught.</text:p>
            <text:p text:style-name="Table_20_Contents"/>
            <text:p text:style-name="P47">Luke 6:13</text:p>
            <text:p text:style-name="Table_20_Contents">And when it was day, he called unto him <text:span text:style-name="T38">his disciples</text:span>: and <text:span text:style-name="T130">of them he chose twelve</text:span>, whom <text:span text:style-name="T38">also he named apostles</text:span><text:span text:style-name="T40">G652</text:span>;</text:p>
          </table:table-cell>
        </table:table-row>
      </table:table>
      <text:p text:style-name="P108"/>
      <text:list xml:id="list590686351" text:style-name="L15">
        <text:list-item>
          <text:p text:style-name="P109">“<text:span text:style-name="T131">The twelve” </text:span><text:span text:style-name="T132">disciples </text:span><text:span text:style-name="T133">are also called apostles </text:span><text:span text:style-name="T134">during</text:span><text:span text:style-name="T133"> Christ’s ministry.</text:span></text:p>
        </text:list-item>
        <text:list-item>
          <text:p text:style-name="P110">Six times <text:span text:style-name="T135">(potentially seven) </text:span>“<text:span text:style-name="T136">the twelve”</text:span> are called apostles <text:span text:style-name="T14">before</text:span> Christ resurrected.</text:p>
        </text:list-item>
        <text:list-item>
          <text:p text:style-name="P111">These also appear to be well before they were <text:span text:style-name="T32">sent</text:span> to do anything for God.</text:p>
        </text:list-item>
      </text:list>
      <text:p text:style-name="P112"/>
      <text:p text:style-name="P113">If “seeing the risen Christ” were a requirement for being called an apostle we’re left with two options:</text:p>
      <text:p text:style-name="P113"/>
      <text:list text:style-name="L16">
        <text:list-item>
          <text:p text:style-name="P114">God used the wrong word to describe the twelve in at least six places.</text:p>
        </text:list-item>
        <text:list-item>
          <text:p text:style-name="P114">God used a prolepsis (referring to a thing by its future-name).</text:p>
        </text:list-item>
      </text:list>
      <text:p text:style-name="P112"/>
      <text:p text:style-name="P113">Since point one isn’t possible, we’re left with one option <text:span text:style-name="T137">and it is a good one</text:span>. <text:span text:style-name="T138">Prolepses are fairly common in Scripture. </text:span><text:span text:style-name="T139">He</text:span><text:span text:style-name="T138">re are a few examples:</text:span></text:p>
      <text:p text:style-name="P113"/>
      <text:list text:continue-list="list590686351" text:style-name="L15">
        <text:list-item>
          <text:list>
            <text:list-item>
              <text:p text:style-name="P115">Jerusalem</text:p>
              <text:list>
                <text:list-item>
                  <text:p text:style-name="P116">God calls Jebus Jerusalem long before it was conquered <text:span text:style-name="T140">by king David.</text:span></text:p>
                </text:list-item>
                <text:list-item>
                  <text:p text:style-name="P117"><text:span text:style-name="T141">Jos 10:1,3,5,23, 15:8</text:span><text:span text:style-name="T142">, etc.</text:span></text:p>
                </text:list-item>
              </text:list>
            </text:list-item>
            <text:list-item>
              <text:p text:style-name="P118">Bethel</text:p>
              <text:list>
                <text:list-item>
                  <text:p text:style-name="P118">Jacob names this place Bethel <text:span text:style-name="T143">in </text:span><text:span text:style-name="T144">Gen 28:19</text:span><text:span text:style-name="T143">.</text:span></text:p>
                </text:list-item>
                <text:list-item>
                  <text:p text:style-name="P118">His grandfather Abraham visited the same <text:span text:style-name="T145">place</text:span> in <text:span text:style-name="T11">Gen 12:8</text:span>, <text:span text:style-name="T11">13:3</text:span> and God calls it by its future-name <text:span text:style-name="T146">Bethel.</text:span></text:p>
                </text:list-item>
              </text:list>
            </text:list-item>
            <text:list-item>
              <text:p text:style-name="P119">The city of Dan / <text:span text:style-name="T147">northern allotment of Dan</text:span></text:p>
              <text:list>
                <text:list-item>
                  <text:p text:style-name="P119">In <text:span text:style-name="T11">Genesis 14:14-15</text:span>, Abraham pursued the <text:span text:style-name="T148">captors</text:span> of his nephew Lot “unto Dan”.</text:p>
                </text:list-item>
                <text:list-item>
                  <text:p text:style-name="P119">Not only did the tribe of Dan not exist yet but neither did the man <text:span text:style-name="T149">that</text:span> the tribe <text:span text:style-name="T150">and the city </text:span><text:span text:style-name="T151">would be</text:span> named after <text:span text:style-name="T150">(</text:span><text:span text:style-name="T152">Jdg 18:29</text:span><text:span text:style-name="T150">).</text:span></text:p>
                </text:list-item>
              </text:list>
            </text:list-item>
            <text:list-item>
              <text:p text:style-name="P120">The Amalekites <text:span text:style-name="T153">(</text:span><text:span text:style-name="T154">Gen 14:7</text:span><text:span text:style-name="T153">)</text:span></text:p>
              <text:list>
                <text:list-item>
                  <text:p text:style-name="P121">Amalek the grandson of Esau (<text:span text:style-name="T11">Gen 36:12</text:span>) wasn’t born yet.</text:p>
                </text:list-item>
              </text:list>
            </text:list-item>
            <text:list-item>
              <text:p text:style-name="P122">Ur of the Chaldees (<text:span text:style-name="T11">Gen 11:28,31</text:span>)</text:p>
              <text:list>
                <text:list-item>
                  <text:p text:style-name="P123">The Chaldeans had not yet risen to prominence or established dominion of that region yet.</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ext:soft-page-break/>Other apostles</text:h>
      <text:p text:style-name="Standard"/>
      <table:table table:name="Table4" table:style-name="Table4">
        <table:table-column table:style-name="Table4.A"/>
        <table:table-row>
          <table:table-cell table:style-name="Table4.A1" office:value-type="string">
            <text:p text:style-name="P47">Acts 14:14</text:p>
            <text:p text:style-name="Table_20_Contents">Which when <text:span text:style-name="T38">the apostles</text:span><text:span text:style-name="T40">G652</text:span><text:span text:style-name="T38">, Barnabas and Paul</text:span>, heard of, they rent their clothes, and ran in among the people, crying out,</text:p>
            <text:p text:style-name="Table_20_Contents"/>
            <text:p text:style-name="P47">Romans 16:7</text:p>
            <text:p text:style-name="Table_20_Contents">Salute Andronicus and Junia, my kinsmen, and my fellowprisoners, <text:span text:style-name="T38">who are of note among the apostles</text:span><text:span text:style-name="T40">G652</text:span>, who also were in Christ before me.</text:p>
            <text:p text:style-name="Table_20_Contents"/>
            <text:p text:style-name="P47">Galatians 1:19</text:p>
            <text:p text:style-name="Table_20_Contents">But other of <text:span text:style-name="T38">the apostles</text:span><text:span text:style-name="T40">G652</text:span> saw I none, <text:span text:style-name="T38">save James</text:span> the Lord's brother.</text:p>
            <text:p text:style-name="Table_20_Contents"/>
            <text:p text:style-name="Table_20_Contents"><text:span text:style-name="T11">1 Thessalonians 2:6</text:span> <text:span text:style-name="T155">(Silas/Silvanus &amp; Timothy; cf. </text:span><text:span text:style-name="T156">1Thess 1:1</text:span><text:span text:style-name="T155">)</text:span></text:p>
            <text:p text:style-name="Table_20_Contents">Nor of men sought we glory, neither of you, nor yet of others, when we might have been burdensome, as <text:span text:style-name="T38">the apostles</text:span><text:span text:style-name="T40">G652</text:span><text:span text:style-name="T38"> of Christ</text:span>.</text:p>
          </table:table-cell>
        </table:table-row>
      </table:table>
      <text:p text:style-name="P124"/>
      <text:list text:style-name="L17">
        <text:list-item>
          <text:p text:style-name="P125"><text:span text:style-name="T157">An</text:span><text:span text:style-name="T158">dronicus, Junia, </text:span><text:span text:style-name="T157">and Timothy/</text:span><text:span text:style-name="T159">Timotheus</text:span><text:span text:style-name="T158"> are </text:span><text:span text:style-name="T160">never</text:span><text:span text:style-name="T158"> </text:span><text:span text:style-name="T157">recorded as having seen the risen Christ </text:span><text:span text:style-name="T161">or</text:span><text:span text:style-name="T162"> having any miraculous powers.</text:span></text:p>
          <text:list>
            <text:list-item>
              <text:p text:style-name="P126"><text:span text:style-name="T163">Barnabas (Joses </text:span><text:span text:style-name="T164">Acts 4:36</text:span><text:span text:style-name="T163">)</text:span> is not record<text:span text:style-name="T165">ed</text:span> as having seen the risen Christ but is recorded as “having miraculous powers” (<text:span text:style-name="T11">Acts 15:12</text:span>).</text:p>
            </text:list-item>
            <text:list-item>
              <text:p text:style-name="P127">James is recorded as having seen the risen Christ (<text:span text:style-name="T11">1Cor 15:7</text:span>) but is not recorded as “having miraculous powers”.</text:p>
            </text:list-item>
            <text:list-item>
              <text:p text:style-name="P128">Silas/<text:span text:style-name="T159">Silvanus</text:span> is not recorded as having seen the risen Christ but is recorded as praying with Paul before the earthquake happened (which may or may not imply “miraculous powers”) <text:span text:style-name="T166">(</text:span><text:span text:style-name="T167">Acts 16:25,26</text:span><text:span text:style-name="T166">)</text:span>.</text:p>
            </text:list-item>
          </text:list>
        </text:list-item>
      </text:list>
      <text:p text:style-name="P124"/>
      <text:p text:style-name="P129"><text:span text:style-name="T168">The </text:span><text:span text:style-name="T169">lack</text:span><text:span text:style-name="T168"> of evidence that </text:span><text:span text:style-name="T170">is </text:span><text:span text:style-name="T171">required</text:span><text:span text:style-name="T170"> to </text:span><text:span text:style-name="T171">prove</text:span><text:span text:style-name="T170"> that an ap</text:span><text:span text:style-name="T168">ostle had to see the risen Christ or had to have miraculous powers </text:span><text:span text:style-name="T170">is sufficient to drop any notion of those requirements </text:span><text:span text:style-name="T172">(</text:span><text:span text:style-name="T173">1Th 5:21</text:span><text:span text:style-name="T172">)</text:span><text:span text:style-name="T168">. </text:span><text:span text:style-name="T174">And s</text:span><text:span text:style-name="T175">ince</text:span><text:span text:style-name="T176"> people other than “the twelve” are called apostles </text:span><text:span text:style-name="T177">means </text:span><text:span text:style-name="T178">that the phrase “the apostles” </text:span><text:span text:style-name="T179">is not</text:span><text:span text:style-name="T178"> </text:span><text:span text:style-name="T180">uniquely applied</text:span><text:span text:style-name="T178"> to “the twelve”</text:span><text:span text:style-name="T176">. </text:span><text:span text:style-name="T181">W</text:span><text:span text:style-name="T182">hich way the phrase is being used can be discerned from the context. </text:span><text:span text:style-name="T183">For example:</text:span></text:p>
      <text:p text:style-name="P130"/>
      <table:table table:name="Table14" table:style-name="Table14">
        <table:table-column table:style-name="Table14.A"/>
        <table:table-column table:style-name="Table14.B"/>
        <table:table-row>
          <table:table-cell table:style-name="Table14.A1" office:value-type="string">
            <text:p text:style-name="P47">Galatians 1:18-19</text:p>
            <text:p text:style-name="Table_20_Contents"><text:span text:style-name="T40">18</text:span> Then after three years I went up to Jerusalem to see Peter, and abode with him fifteen days.</text:p>
            <text:p text:style-name="Table_20_Contents"><text:span text:style-name="T40">19</text:span> But other of <text:span text:style-name="T38">the apostles</text:span> saw I none, save James the Lord's brother.</text:p>
          </table:table-cell>
          <table:table-cell table:style-name="Table14.B1" office:value-type="string">
            <text:p text:style-name="P131">Since James <text:span text:style-name="T184">the Lord’s brother </text:span>is not one of “the twelve” <text:span text:style-name="T184">(</text:span><text:span text:style-name="T185">Mat 10:2-4</text:span><text:span text:style-name="T184">)</text:span>, here Paul is referring to “any<text:span text:style-name="T186"> </text:span>of the apostles”.</text:p>
          </table:table-cell>
        </table:table-row>
        <table:table-row>
          <table:table-cell table:style-name="Table14.A2" office:value-type="string">
            <text:p text:style-name="P47">Mark 6:<text:span text:style-name="T187">7,</text:span>30</text:p>
            <text:p text:style-name="Table_20_Contents"><text:span text:style-name="T188">7</text:span><text:span text:style-name="T187"> </text:span>And he called unto him <text:span text:style-name="T38">the twelve</text:span>, and began to send them forth by two and two; and gave them power over unclean spirits;</text:p>
            <text:p text:style-name="Table_20_Contents">...</text:p>
            <text:p text:style-name="Table_20_Contents"><text:span text:style-name="T188">30</text:span><text:span text:style-name="T187"> </text:span>And <text:span text:style-name="T38">the apostles</text:span> gathered themselves together unto Jesus, and told him all things, both what they had done, and what they had taught.</text:p>
          </table:table-cell>
          <table:table-cell table:style-name="Table14.B2" office:value-type="string">
            <text:p text:style-name="P131">“<text:span text:style-name="T189">The twelve” which had been </text:span><text:span text:style-name="T190">sent</text:span><text:span text:style-name="T189"> by </text:span><text:span text:style-name="T191">God</text:span><text:span text:style-name="T189">, when they returned, are called “the apostles”.</text:span></text:p>
          </table:table-cell>
        </table:table-row>
      </table:table>
      <text:p text:style-name="Standard"/>
      <text:list text:style-name="L18">
        <text:list-item>
          <text:p text:style-name="P132"><text:span text:style-name="T192">T</text:span>he office of apostle is not exclusive to the twelve.</text:p>
        </text:list-item>
        <text:list-item>
          <text:p text:style-name="P132"><text:span text:style-name="T192">M</text:span>iraculous powers are not a<text:span text:style-name="T193">n exclusive</text:span> sign of an apostle <text:span text:style-name="T194">(</text:span><text:span text:style-name="T195">1Cor 12:29</text:span><text:span text:style-name="T196">, </text:span><text:span text:style-name="T197">2Cor 12:11-12</text:span><text:span text:style-name="T194">).</text:span></text:p>
        </text:list-item>
        <text:list-item>
          <text:p text:style-name="P133">Miracles and wonders <text:span text:style-name="T198">are not </text:span>an exclusive gift given <text:span text:style-name="T199">to the apostles </text:span><text:span text:style-name="T200">or the twelve </text:span><text:span text:style-name="T199">(</text:span><text:span text:style-name="T201">Mar 9:38-39</text:span><text:span text:style-name="T202">, </text:span><text:span text:style-name="T201">Luk 9:49-50</text:span><text:span text:style-name="T202">, </text:span><text:span text:style-name="T203">Acts </text:span><text:span text:style-name="T204">8:5-7</text:span><text:span text:style-name="T205">, </text:span><text:span text:style-name="T203">6:8</text:span><text:span text:style-name="T199">, </text:span><text:span text:style-name="T206">9:17-18</text:span><text:span text:style-name="T207">) </text:span><text:span text:style-name="T199">nor were they solely for the Jews</text:span><text:span text:style-name="T207"> (</text:span><text:span text:style-name="T208">Acts </text:span><text:span text:style-name="T209">13:6-12</text:span><text:span text:style-name="T210">, </text:span><text:span text:style-name="T211">14:8-18</text:span><text:span text:style-name="T212">, </text:span><text:span text:style-name="T208">15:12</text:span><text:span text:style-name="T207">, </text:span><text:span text:style-name="T213">19:11-12,19</text:span><text:span text:style-name="T214">, </text:span><text:span text:style-name="T213">28:1-6</text:span><text:span text:style-name="T214">,</text:span><text:span text:style-name="T207"> </text:span><text:span text:style-name="T215">Rom 15:18-19</text:span><text:span text:style-name="T199">) </text:span><text:span text:style-name="T216">or solely for the “church age” (</text:span><text:span text:style-name="T217">Exo 14:21</text:span><text:span text:style-name="T218">, </text:span><text:span text:style-name="T217">1Ki 17:21-22</text:span><text:span text:style-name="T218">, </text:span><text:span text:style-name="T217">2Ki 4:6</text:span><text:span text:style-name="T216">).</text:span></text:p>
        </text:list-item>
      </text:list>
      <text:h text:style-name="P1" text:outline-level="2"><text:soft-page-break/><text:span text:style-name="T219">Pre-Messianic </text:span><text:span text:style-name="T220">a</text:span><text:span text:style-name="T219">postles</text:span></text:h>
      <text:p text:style-name="Standard"/>
      <table:table table:name="Table5" table:style-name="Table5">
        <table:table-column table:style-name="Table5.A"/>
        <table:table-row>
          <table:table-cell table:style-name="Table5.A1" office:value-type="string">
            <text:p text:style-name="P47">Luke 11:49-51</text:p>
            <text:p text:style-name="Table_20_Contents"><text:span text:style-name="T40">49</text:span> <text:span text:style-name="T42">Therefore also said the wisdom of God, I will send</text:span><text:span text:style-name="T40">G649 </text:span><text:span text:style-name="T42"><text:s/></text:span><text:span text:style-name="T221">them</text:span><text:span text:style-name="T42"> </text:span><text:span text:style-name="T39">prophets and apostles</text:span><text:span text:style-name="T40">G652</text:span><text:span text:style-name="T42">, and some of </text:span><text:span text:style-name="T39">them</text:span><text:span text:style-name="T42"> </text:span><text:span text:style-name="T221">they</text:span><text:span text:style-name="T42"> shall slay and persecute:</text:span></text:p>
            <text:p text:style-name="Table_20_Contents"><text:span text:style-name="T40">50</text:span> <text:span text:style-name="T42">That the blood of </text:span><text:span text:style-name="T39">all the prophets</text:span><text:span text:style-name="T42">, which was shed from the foundation of the world, may be required of this generation;</text:span></text:p>
            <text:p text:style-name="Table_20_Contents"><text:span text:style-name="T40">51</text:span> <text:span text:style-name="T222">From</text:span><text:span text:style-name="T42"> the blood of </text:span><text:span text:style-name="T222">Abel</text:span><text:span text:style-name="T42"> </text:span><text:span text:style-name="T222">unto</text:span><text:span text:style-name="T42"> the blood of </text:span><text:span text:style-name="T222">Zacharias</text:span><text:span text:style-name="T42">, which perished between the altar and the temple: verily I say unto you, It shall be required of this generation.</text:span></text:p>
          </table:table-cell>
        </table:table-row>
      </table:table>
      <text:p text:style-name="P134"/>
      <text:p text:style-name="P135">Note that verses 49–51 are all one continuous sentence. Because "apostles" does not grammatically modify "prophets," we know this is not a hendiadys. Instead, this sentence uses <text:span text:style-name="T32">direct structural parallelism</text:span> (nominal equivalence). In verse 49, Christ introduces "prophets and apostles" as the compound subject, but in verse 50 He immediately collapses them into the singular group noun “<text:span text:style-name="T223">the prophets”.</text:span></text:p>
      <text:p text:style-name="P135"/>
      <text:p text:style-name="P135">This grammatical shift proves that "apostles" is not a separate New Testament class here, but rather a functional description of the very same Old Testament prophets.</text:p>
      <text:p text:style-name="Standard"/>
      <table:table table:name="Table16" table:style-name="Table16">
        <table:table-column table:style-name="Table16.A"/>
        <table:table-row>
          <table:table-cell table:style-name="Table16.A1" office:value-type="string">
            <text:p text:style-name="P47">Matthew 23:34-35</text:p>
            <text:p text:style-name="Table_20_Contents"><text:span text:style-name="T40">34</text:span> Wherefore, behold, I send<text:span text:style-name="T224">G649</text:span> unto you <text:span text:style-name="T38">prophets, and wise men, and scribes</text:span>: and some of them ye shall kill and crucify; and some of them shall ye scourge in your synagogues, and persecute them from city to city:</text:p>
            <text:p text:style-name="Table_20_Contents"><text:span text:style-name="T40">35</text:span> That upon you may come all <text:span text:style-name="T38">the righteous</text:span> blood shed upon the earth, from the blood of righteous Abel unto the blood of Zacharias son of Barachias, whom ye slew between the temple and the altar.</text:p>
          </table:table-cell>
        </table:table-row>
      </table:table>
      <text:p text:style-name="Standard"/>
      <text:p text:style-name="Standard">The parallel account in <text:span text:style-name="T11">Mat</text:span><text:span text:style-name="T225">thew</text:span> provides <text:span text:style-name="T226">more</text:span> textual proof of this functional definition. While <text:span text:style-name="T11">Luke</text:span> lists two groups ("prophets and apostles") and <text:span text:style-name="T11">Matthew</text:span> lists three ("prophets, and wise men, and scribes"), they are structurally identical in how they map to each other:</text:p>
      <text:p text:style-name="P62"/>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36"><text:span text:style-name="Strong_20_Emphasis"><text:span text:style-name="T56">Passage</text:span></text:span></text:p>
            </table:table-cell>
            <table:table-cell table:style-name="Table17.A1" office:value-type="string">
              <text:p text:style-name="P136"><text:span text:style-name="Strong_20_Emphasis"><text:span text:style-name="T56">Active Verb</text:span></text:span></text:p>
            </table:table-cell>
            <table:table-cell table:style-name="Table17.A1" office:value-type="string">
              <text:p text:style-name="P136"><text:span text:style-name="Strong_20_Emphasis"><text:span text:style-name="T56">Listed Groups</text:span></text:span></text:p>
            </table:table-cell>
            <table:table-cell table:style-name="Table17.D1" office:value-type="string">
              <text:p text:style-name="P136"><text:span text:style-name="Strong_20_Emphasis"><text:span text:style-name="T56">Summary Group</text:span></text:span></text:p>
            </table:table-cell>
          </table:table-row>
        </table:table-header-rows>
        <table:table-row>
          <table:table-cell table:style-name="Table17.A2" office:value-type="string">
            <text:p text:style-name="P137">Luk 11:49-50</text:p>
          </table:table-cell>
          <table:table-cell table:style-name="Table17.A2" office:value-type="string">
            <text:p text:style-name="P138"><text:span text:style-name="T1">"I will send"</text:span> (G649 - <text:span text:style-name="T1">apostellō</text:span>)</text:p>
          </table:table-cell>
          <table:table-cell table:style-name="Table17.A2" office:value-type="string">
            <text:p text:style-name="P139"><text:span text:style-name="T130">prophets</text:span> and <text:span text:style-name="T227">apostles</text:span></text:p>
          </table:table-cell>
          <table:table-cell table:style-name="Table17.D2" office:value-type="string">
            <text:p text:style-name="P140">"the prophets"</text:p>
          </table:table-cell>
        </table:table-row>
        <table:table-row>
          <table:table-cell table:style-name="Table17.A2" office:value-type="string">
            <text:p text:style-name="P137">Mat 23:34-35</text:p>
          </table:table-cell>
          <table:table-cell table:style-name="Table17.A2" office:value-type="string">
            <text:p text:style-name="P138"><text:span text:style-name="T1">"I send"</text:span> (G649 - <text:span text:style-name="T1">apostellō</text:span>)</text:p>
          </table:table-cell>
          <table:table-cell table:style-name="Table17.A2" office:value-type="string">
            <text:p text:style-name="P139"><text:span text:style-name="T130">prophets</text:span>, <text:span text:style-name="T227">wise men, and scribes</text:span></text:p>
          </table:table-cell>
          <table:table-cell table:style-name="Table17.D2" office:value-type="string">
            <text:p text:style-name="P140">"the righteous"</text:p>
          </table:table-cell>
        </table:table-row>
      </table:table>
      <text:p text:style-name="P62"/>
      <text:p text:style-name="P62">Because "prophets" is common to both lists, the term "apostles" in <text:span text:style-name="T11">Luke</text:span> occupies the exact same structural position as "wise men, and scribes" in <text:span text:style-name="T11">Matthew</text:span>. Both lists are governed by the active verb "send" (apostellō). Therefore, the "apostles" in <text:span text:style-name="T11">Luke</text:span> are not a 1st-century church office, but rather a literal description of the sent ones of the Old <text:span text:style-name="T228">Testament</text:span>—the very wise men and scribes who were persecuted long before the New Testament era.</text:p>
      <text:p text:style-name="Standard"/>
      <text:p text:style-name="Standard">To find the "apostles" of <text:span text:style-name="T11">Luke 11</text:span> occupying the exact office of <text:span text:style-name="T11">Matthew</text:span>'s "wise men and scribes" is not a modern grammatical novelty. In his <text:span text:style-name="T32">Commentary on a Harmony of the Evangelists</text:span> <text:span text:style-name="T229">page</text:span> 101, John Calvin <text:span text:style-name="T230">correctly interprets the grammar of the English </text:span><text:span text:style-name="T231">and </text:span><text:span text:style-name="T232">in doing so</text:span><text:span text:style-name="T231"> admits </text:span><text:span text:style-name="T232">the </text:span><text:span text:style-name="T233">proof</text:span><text:span text:style-name="T232"> of </text:span><text:span text:style-name="T231">Old Testament apostles </text:span><text:span text:style-name="T233">in Scripture</text:span>:</text:p>
      <text:p text:style-name="Standard"/>
      <text:p text:style-name="Quotations"><text:s text:c="4"/>"<text:span text:style-name="T74">Instead of wise men and scribes, Luke mentions apostles, </text:span><text:span text:style-name="T14">but the meaning is the same</text:span><text:span text:style-name="T74">.</text:span>"</text:p>
      <text:p text:style-name="Standard"/>
      <text:p text:style-name="P141">But, how he then went on to <text:span text:style-name="T234">arbitrarily </text:span>segregate not only the office of apostle but also all the other gifts in <text:span text:style-name="T11">Eph 4:8-13</text:span> <text:span text:style-name="T234">in </text:span><text:span text:style-name="T235">Institutes for the Christian Religion</text:span><text:span text:style-name="T234"> </text:span>is truly anyone’s guess because <text:span text:style-name="T14">he did not provide any scriptural proof</text:span> to <text:span text:style-name="T236">justify</text:span> <text:span text:style-name="T234">those choices.</text:span></text:p>
      <text:h text:style-name="P1" text:outline-level="2"><text:soft-page-break/>Continuous <text:span text:style-name="T237">a</text:span>postolic and <text:span text:style-name="T237">p</text:span>rophetic <text:span text:style-name="T237">m</text:span>essengers</text:h>
      <text:p text:style-name="Standard"/>
      <table:table table:name="Table11" table:style-name="Table11">
        <table:table-column table:style-name="Table11.A"/>
        <table:table-row>
          <table:table-cell table:style-name="Table11.A1" office:value-type="string">
            <text:p text:style-name="P47">Revelation 18:20,<text:span text:style-name="T238">24</text:span></text:p>
            <text:p text:style-name="Table_20_Contents"><text:span text:style-name="T239">20</text:span><text:span text:style-name="T238"> </text:span>Rejoice over her, thou heaven, and ye <text:span text:style-name="T38">holy apostles and prophets</text:span>; for God hath avenged you on her.</text:p>
            <text:p text:style-name="Table_20_Contents">...</text:p>
            <text:p text:style-name="Table_20_Contents"><text:span text:style-name="T239">24</text:span><text:span text:style-name="T238"> </text:span>And in her was found the blood of prophets, and of saints, and of <text:span text:style-name="T38">all</text:span> that were slain upon the earth.</text:p>
          </table:table-cell>
        </table:table-row>
      </table:table>
      <text:p text:style-name="P142"/>
      <text:p text:style-name="P142">If "apostles" were a temporary group that ceased in the first century, it makes no sense for God to address them alongside prophets as the ongoing, continuous targets of Babylon's historical wrath right up to the end of the tribulation period. The Scriptures and their underlying grammar support the continuous sending of these messengers through two distinct syntactic angles:</text:p>
      <text:p text:style-name="P142"/>
      <text:p text:style-name="P143"><text:span text:style-name="T14">1</text:span>. Grammatical distinction in <text:span text:style-name="T11">Rev 18:20</text:span> (separate groups)</text:p>
      <text:p text:style-name="P144"/>
      <text:p text:style-name="Standard">Unlike <text:span text:style-name="T11">Eph 3:5</text:span>, which uses a single possessive determiner to bind them together ("<text:span text:style-name="T14">his</text:span> holy apostles and prophets"), the use of the pronoun "ye" in <text:span text:style-name="T240">Rev</text:span><text:span text:style-name="T11"> 18:20</text:span> acts as a direct personal address that cannot distribute a single modifier across both nouns. In English syntax, the adjective "holy" only modifies the immediate noun following it ("apostles"), reading structurally as: "ye [holy apostles] and [prophets]." Because "prophets" does not receive the modifier "holy" in this English construction, the syntax establishes that holy apostles and prophets are indeed two distinct, individual groups being addressed side-by-side.</text:p>
      <text:p text:style-name="Standard"/>
      <text:p text:style-name="P143"><text:span text:style-name="T14">2</text:span>. <text:span text:style-name="T241">Syntactic unity in </text:span><text:span text:style-name="T242">Eph 2:20, 3:5</text:span><text:span text:style-name="T241"> (single function</text:span><text:span text:style-name="T243">al</text:span><text:span text:style-name="T241"> unit</text:span><text:span text:style-name="T243">s</text:span><text:span text:style-name="T241">)</text:span></text:p>
      <text:p text:style-name="P143"/>
      <table:table table:name="Table10" table:style-name="Table10">
        <table:table-column table:style-name="Table10.A"/>
        <table:table-row>
          <table:table-cell table:style-name="Table10.A1" office:value-type="string">
            <text:p text:style-name="P145">Ephesians 2:20</text:p>
            <text:p text:style-name="P146">And are built upon the <text:span text:style-name="T41">foundation of </text:span><text:span text:style-name="T130">the</text:span><text:span text:style-name="T41"> </text:span><text:span text:style-name="T38">apostles and prophets</text:span>, Jesus Christ himself being the chief corner stone;</text:p>
          </table:table-cell>
        </table:table-row>
        <table:table-row>
          <table:table-cell table:style-name="Table10.A2" office:value-type="string">
            <text:p text:style-name="P47">Ephesians 3:5</text:p>
            <text:p text:style-name="Table_20_Contents">Which in other ages was not made known unto the sons of men, as it is now revealed unto <text:span text:style-name="T130">his</text:span> <text:span text:style-name="T38">holy apostles and prophets</text:span> by the Spirit;</text:p>
          </table:table-cell>
        </table:table-row>
      </table:table>
      <text:p text:style-name="P143"/>
      <text:p text:style-name="P147">Unlike <text:span text:style-name="T11">Rev 18:20</text:span>, in these verses they are a single functional unit. Because "the" (<text:span text:style-name="T11">2:20</text:span>) and "his" (<text:span text:style-name="T11">3:5</text:span>) are determiners governing both plural nouns, they grammatically treat them as a single, inseparable compound category. If they were grammatically distinct <text:span text:style-name="T244">groups </text:span>here, the text would repeat the modifier: "<text:span text:style-name="T14">the</text:span> apostles and <text:span text:style-name="T14">the</text:span> prophets" or "<text:span text:style-name="T14">his</text:span> apostles and <text:span text:style-name="T14">his</text:span> prophets." Cessationists use <text:span text:style-name="T11">Eph 2:20</text:span> to claim the "foundation" is closed, arguing that apostles and prophets both ceased in the first century. However, this single-determiner grammar locks both offices into an inseparable syntactic unit that must share the same timeline.</text:p>
      <text:p text:style-name="P148"/>
      <text:p text:style-name="P149"><text:span text:style-name="T14">Conclusion</text:span>:</text:p>
      <text:p text:style-name="P149"/>
      <text:p text:style-name="P149">This dual grammatical design creates an inescapable logical trap for the cessationist framework:</text:p>
      <text:p text:style-name="P149"/>
      <text:list text:style-name="L19">
        <text:list-item>
          <text:p text:style-name="P150"><text:span text:style-name="T11">Rev 18:20</text:span> grammatically distinguishes them as two groups, addressing both as active targets of Babylon's wrath right up to her final destruction.</text:p>
        </text:list-item>
        <text:list-item>
          <text:p text:style-name="P150"><text:span text:style-name="T11">Rev 11:3, 10</text:span> explicitly proves that "prophets" are still actively sent and martyred during the tribulation, meaning the prophetic office never ceased.</text:p>
        </text:list-item>
        <text:list-item>
          <text:p text:style-name="P150"><text:span text:style-name="T11">Eph 2:20 &amp; 3:5</text:span> syntactically bind both offices as a single, shared category that stands or falls together.</text:p>
        </text:list-item>
      </text:list>
      <text:p text:style-name="P149"/>
      <text:p text:style-name="P149">Therefore, because prophets are undeniably active at the end of history, and because <text:span text:style-name="T11">Ephesians</text:span> syntactically binds them to the apostles, the apostolic office must remain active as well—completely dismantling the cessationist "foundation theory."</text:p>
      <text:h text:style-name="P1" text:outline-level="2"><text:soft-page-break/><text:span text:style-name="T245">T</text:span><text:span text:style-name="T246">he Gift that keeps on giving</text:span></text:h>
      <text:p text:style-name="Standard"/>
      <text:p text:style-name="Standard"/>
      <table:table table:name="Table13" table:style-name="Table13">
        <table:table-column table:style-name="Table13.A"/>
        <table:table-row>
          <table:table-cell table:style-name="Table13.A1" office:value-type="string">
            <text:p text:style-name="P151">Ephesians 4:8-13</text:p>
            <text:p text:style-name="P152"><text:span text:style-name="T40">8</text:span> Wherefore he saith, When he ascended up on high, he led captivity captive, and gave gifts unto men.</text:p>
            <text:p text:style-name="P152"><text:span text:style-name="T40">9</text:span> (Now that he ascended, what is it but that he also descended first into the lower parts of the earth?</text:p>
            <text:p text:style-name="P152"><text:span text:style-name="T40">10</text:span> He that descended is the same also that ascended up far above all heavens, that he might fill all things.)</text:p>
            <text:p text:style-name="P152"><text:span text:style-name="T40">11</text:span> And <text:span text:style-name="T130">he gave some, apostles; and some, prophets; and some, evangelists; and some, pastors </text:span><text:span text:style-name="T247">and</text:span><text:span text:style-name="T130"> teachers</text:span>;</text:p>
            <text:p text:style-name="P152"><text:span text:style-name="T40">12</text:span> <text:span text:style-name="T38">For the perfecting of the saints, for the work of the ministry, for the edifying of the body of Christ</text:span>:</text:p>
            <text:p text:style-name="P152"><text:span text:style-name="T40">13</text:span> <text:span text:style-name="T42">Till we all</text:span> come in the unity of the faith, and of the knowledge of the Son of God, unto a perfect man, unto the measure of the stature of the fulness of Christ:</text:p>
          </table:table-cell>
        </table:table-row>
      </table:table>
      <text:p text:style-name="P153"/>
      <text:p text:style-name="P154">In <text:span text:style-name="T11">Ephesians 4:11</text:span>, the listed gifts cannot be split without creating an irreconcilable grammatical contradiction. God establishes a single, unbroken timeframe beginning at Christ's ascension (v8) and ending when the entire body of Christ reaches "the unity of the faith" (v13). Because all five gifts are grouped together within this same explicit boundary, claiming we need pastors today but not apostles violates the plain syntax of the text.</text:p>
      <text:p text:style-name="P154"/>
      <text:p text:style-name="P154">Furthermore, <text:span text:style-name="T11">Romans 10:15a</text:span> asks, "And how shall they preach, except they be sent<text:span text:style-name="T40">G649</text:span>?" The Greek verb used is apostellō (ἀποστέλλω), which is the direct verbal root of the noun apostolos (ἀπόστολος - apostle). To argue that the office of the apostle has ended is to make the grammatically and spiritually absurd claim that God has ceased sending ἀποστέλλω messengers altogether. If the "till" of verse 13 and the timeline of <text:span text:style-name="T11">Revelation 6:11</text:span> have not yet passed, then declaring the apostolic office ended forces the illogical conclusion that evangelists, prophets, and pastors have ended as well.</text:p>
      <text:p text:style-name="P155"/>
      <text:p text:style-name="P156">Calvin’s <text:span text:style-name="T248">a</text:span>rbitrary <text:span text:style-name="T248">d</text:span>ivision and <text:span text:style-name="T248">i</text:span>ts <text:span text:style-name="T248">g</text:span>rammatical <text:span text:style-name="T248">c</text:span>onsequence</text:p>
      <text:p text:style-name="P155"/>
      <text:p text:style-name="P155">In <text:span text:style-name="T32">Institutes of the Christian Religion</text:span> (IV.3.4), John Calvin explicitly wrestles with this unified list, <text:span text:style-name="T14">arbitrarily</text:span> <text:span text:style-name="T14">dividing</text:span> it into two categories:</text:p>
      <text:p text:style-name="P155"/>
      <text:p text:style-name="Quotations"><text:s text:c="4"/>"...only the last two [Pastors and Teachers] are ordinary and perpetual; the first three [Apostles, Prophets, and Evangelists] were extraordinary and temporary..."</text:p>
      <text:p text:style-name="P155"/>
      <text:p text:style-name="P155"><text:span text:style-name="T14">Calvin admits these offices sit under a single grammatical umbrella</text:span> in verse 11, yet he inserts an invisible boundary line to support his cessationist framework. This <text:span text:style-name="T14">division</text:span> exposes a fatal logical error: the text contains only one timeline. The "till" of verse 13 governs the <text:span text:style-name="T14">entire</text:span> list.</text:p>
      <text:p text:style-name="P155"/>
      <text:p text:style-name="P155">Additionally, verse 12 anchors the purpose of all these gifts to three <text:span text:style-name="T14">ongoing</text:span> structural goals: the perfecting of the saints, the work of the ministry, and the edifying of the body of Christ. To slice the list in half, as Calvin did, is to assert that the body of Christ can still achieve these continuous, active goals while missing more than half of the spiritual tools God explicitly gave to build it.</text:p>
      <text:p text:style-name="P157"/>
      <text:p text:style-name="P157"/>
      <text:p text:style-name="P157"/>
      <text:p text:style-name="P157"/>
      <text:p text:style-name="P157"/>
      <text:p text:style-name="P157"/>
      <text:p text:style-name="P157"/>
      <text:p text:style-name="P157"/>
      <text:p text:style-name="P157"/>
      <text:p text:style-name="P157"/>
      <text:h text:style-name="P1" text:outline-level="2"><text:soft-page-break/>Paul as the last apostle</text:h>
      <text:p text:style-name="Standard"/>
      <text:p text:style-name="P158">I don’t understand how they do it, but somehow people use the following verses to “prove” that Paul was the last apostle (ever). <text:span text:style-name="T249">We’ve already disproved that possibility several times over </text:span><text:span text:style-name="T250">because that interpretation contradicts at least three other verses. </text:span><text:span text:style-name="T251">So, we’ll just look at what is there </text:span><text:span text:style-name="T252">and break it down.</text:span></text:p>
      <text:p text:style-name="P159"/>
      <table:table table:name="Table6" table:style-name="Table6">
        <table:table-column table:style-name="Table6.A"/>
        <table:table-row>
          <table:table-cell table:style-name="Table6.A1" office:value-type="string">
            <text:p text:style-name="P47">1 Corinthians 15:5-8</text:p>
            <text:p text:style-name="Table_20_Contents"><text:span text:style-name="T40">5</text:span> And that he was seen of Cephas, then of the twelve:</text:p>
            <text:p text:style-name="Table_20_Contents"><text:span text:style-name="T40">6</text:span> After that, he was seen of above five hundred brethren at once; of whom the greater part remain unto this present, but some are fallen asleep.</text:p>
            <text:p text:style-name="Table_20_Contents"><text:span text:style-name="T40">7</text:span> After that, he was seen of James; then of all the apostles.</text:p>
            <text:p text:style-name="Table_20_Contents"><text:span text:style-name="T40">8</text:span> And last of all he was seen of me also, as of one born out of due time.</text:p>
          </table:table-cell>
        </table:table-row>
      </table:table>
      <text:list xml:id="list2409046032" text:style-name="L20">
        <text:list-item>
          <text:p text:style-name="P160"><text:span text:style-name="T253">Paul</text:span> <text:span text:style-name="T254">does not call</text:span> himself an apostle nor does he count himself among them (v<text:span text:style-name="T254">5,</text:span>7) <text:span text:style-name="T255">in this context</text:span>.</text:p>
        </text:list-item>
        <text:list-item>
          <text:p text:style-name="P161">The list of people <text:span text:style-name="T14">are not all apostles</text:span>, so these verses clearly have nothing to do with establishing who was an apostle or when.</text:p>
        </text:list-item>
      </text:list>
      <text:list text:style-name="L21">
        <text:list-item>
          <text:list>
            <text:list-item>
              <text:p text:style-name="P162">Cephas <text:span text:style-name="T256">(Simon Peter; one of the twelve)</text:span></text:p>
            </text:list-item>
            <text:list-item>
              <text:p text:style-name="P162">The twelve <text:span text:style-name="T257">(called apostles elsewhere: </text:span><text:span text:style-name="T258">Mat 10:2,3</text:span><text:span text:style-name="T257">)</text:span></text:p>
            </text:list-item>
            <text:list-item>
              <text:p text:style-name="P162">Above 500 brethren at once <text:span text:style-name="T259">(</text:span><text:span text:style-name="T260">not </text:span><text:span text:style-name="T261">ever </text:span><text:span text:style-name="T260">called apostles</text:span><text:span text:style-name="T259">)</text:span></text:p>
            </text:list-item>
            <text:list-item>
              <text:p text:style-name="P162">James <text:span text:style-name="T256">(called an apostle elsewhere: </text:span><text:span text:style-name="T262">Gal 1:19</text:span><text:span text:style-name="T256">)</text:span></text:p>
            </text:list-item>
            <text:list-item>
              <text:p text:style-name="P162"><text:span text:style-name="T14">all</text:span> the apostles</text:p>
            </text:list-item>
            <text:list-item>
              <text:p text:style-name="P163">last of all (those listed), Paul <text:span text:style-name="T263">(called an apostle </text:span><text:span text:style-name="T264">elsewhere</text:span><text:span text:style-name="T263">: </text:span><text:span text:style-name="T265">Rom 1:1</text:span><text:span text:style-name="T263">)</text:span></text:p>
            </text:list-item>
          </text:list>
        </text:list-item>
      </text:list>
      <text:list text:continue-list="list2409046032" text:style-name="L20">
        <text:list-item>
          <text:p text:style-name="P164"><text:span text:style-name="T266">N</text:span>ote: all means all. “The twelve” were already listed so “all the apostles” is not a phrase that means “the twelve” <text:span text:style-name="T267">here.</text:span></text:p>
        </text:list-item>
      </text:list>
      <text:p text:style-name="P165"/>
      <text:h text:style-name="P1" text:outline-level="2">Qualifications for an apostle</text:h>
      <text:p text:style-name="Standard"/>
      <text:p text:style-name="P166">To establish the tradition that an apostle must needs have seen the risen Christ, these verses are used.</text:p>
      <text:p text:style-name="Standard"/>
      <table:table table:name="Table7" table:style-name="Table7">
        <table:table-column table:style-name="Table7.A"/>
        <table:table-row>
          <table:table-cell table:style-name="Table7.A1" office:value-type="string">
            <text:p text:style-name="P47">Acts 1:21-22</text:p>
            <text:p text:style-name="Table_20_Contents"><text:span text:style-name="T40">21</text:span> Wherefore of these men which have companied with us all the time that the Lord Jesus went in and out among us,</text:p>
            <text:p text:style-name="Table_20_Contents"><text:span text:style-name="T40">22</text:span> Beginning from the baptism of John, unto that same day that he was taken up from us, <text:span text:style-name="T38">must one be ordained to be a witness with us of his resurrection</text:span>.</text:p>
          </table:table-cell>
        </table:table-row>
      </table:table>
      <text:p text:style-name="P167"/>
      <text:p text:style-name="P167"><text:span text:style-name="T268">We’ve already established with Scripture that b</text:span>eing one of “the twelve” <text:span text:style-name="T269">is</text:span><text:span text:style-name="T14"> not</text:span> a requirement to be called an apostle. <text:span text:style-name="T270">Therefore, </text:span><text:span text:style-name="T271">these verses have</text:span><text:span text:style-name="T270"> nothing to do with defining the </text:span><text:span text:style-name="T271">requirements for an</text:span><text:span text:style-name="T270"> apostle. </text:span><text:span text:style-name="T272">They do </text:span><text:span text:style-name="T268">define</text:span><text:span text:style-name="T273"> the requirements for </text:span><text:span text:style-name="T274">being </text:span><text:span text:style-name="T273">one of “the twelve”.</text:span></text:p>
      <text:p text:style-name="P168"/>
      <table:table table:name="Table12" table:style-name="Table12">
        <table:table-column table:style-name="Table12.A"/>
        <table:table-row>
          <table:table-cell table:style-name="Table12.A1" office:value-type="string">
            <text:p text:style-name="P47">1 Corinthians 9:1-2</text:p>
            <text:p text:style-name="Table_20_Contents"><text:span text:style-name="T40">1</text:span> Am I not an apostle? am I not free? have I not seen Jesus Christ our Lord? are not ye my work in the Lord?</text:p>
            <text:p text:style-name="Table_20_Contents"><text:span text:style-name="T40">2</text:span> If I be not an apostle unto others, yet doubtless I am to you: for <text:span text:style-name="T38">the seal of mine apostleship are ye</text:span> in the Lord.</text:p>
          </table:table-cell>
        </table:table-row>
      </table:table>
      <text:p text:style-name="P169"/>
      <text:p text:style-name="P170">Paul is defending his personal authority against critics in Corinth who were personally attacking <text:span text:style-name="T14">him</text:span>. He is listing <text:span text:style-name="T14">his</text:span> unique, top-tier credentials, not a bare-minimum entry requirement. <text:span text:style-name="T275">The text doesn’t even imply that these are requirements for an apostle. </text:span><text:span text:style-name="T276">A</text:span><text:span text:style-name="T277">s documented above, there is sufficient lack of proof </text:span><text:span text:style-name="T276">of</text:span><text:span text:style-name="T277"> </text:span><text:span text:style-name="T278">all</text:span><text:span text:style-name="T276"> of </text:span><text:span text:style-name="T277">the other </text:span><text:span text:style-name="T276">named </text:span><text:span text:style-name="T277">apostles </text:span><text:span text:style-name="T276">seeing</text:span><text:span text:style-name="T277"> the risen Christ to dismiss that requirement entirely. </text:span><text:span text:style-name="T276">In other words, in order to prove </text:span><text:span text:style-name="T279">beyond a shadow of a doubt </text:span><text:span text:style-name="T276">that an apostle must needs have seen the risen Christ we would first need proof that </text:span><text:span text:style-name="T278">every</text:span><text:span text:style-name="T276"> apostle saw the risen Christ. </text:span><text:span text:style-name="T280">Because that proof does not exist in Scripture, we should not hold fast to that </text:span><text:span text:style-name="T281">(</text:span><text:span text:style-name="T282">1Thess 5:21</text:span><text:span text:style-name="T281">).</text:span></text:p>
      <text:p text:style-name="P171"><text:soft-page-break/><text:span text:style-name="T283">Taking Paul’s “qualifications” and then transplanting them as requirements for every other apostle </text:span>is a logical fallacy known as <text:span text:style-name="T32">affirming the consequent</text:span>.</text:p>
      <text:p text:style-name="P172"/>
      <text:p text:style-name="P173">The fallacy takes this structural form:</text:p>
      <text:p text:style-name="P173"/>
      <text:list text:style-name="L22">
        <text:list-item>
          <text:p text:style-name="P174">If P, then Q. (eg. If it's raining, the sidewalk is wet.)</text:p>
        </text:list-item>
        <text:list-item>
          <text:p text:style-name="P174">Q is true. (eg. The sidewalk is wet.)</text:p>
        </text:list-item>
        <text:list-item>
          <text:p text:style-name="P174">Therefore, P is true. (eg. Therefore, it is raining.)</text:p>
        </text:list-item>
      </text:list>
      <text:p text:style-name="P173"/>
      <text:p text:style-name="P173">This argument is invalid because other factors could explain why the sidewalk is wet (eg. a sprinkler or a broken fire hydrant).</text:p>
      <text:p text:style-name="P173"/>
      <text:p text:style-name="P175">Likewise, just because Paul has these qualifications does not necessitate that every apostle needed to have these qualifications.</text:p>
      <text:p text:style-name="P176"/>
      <text:p text:style-name="P176"><text:span text:style-name="T284">This is most easily </text:span><text:span text:style-name="T285">proven</text:span><text:span text:style-name="T284"> by the fact that “</text:span><text:span text:style-name="T286">are not ye my work in the Lord?</text:span><text:span text:style-name="T284">” </text:span><text:span text:style-name="T287">does not</text:span> apply to <text:span text:style-name="T14">all</text:span> apostles and “<text:span text:style-name="T32">am I not free?</text:span>” does not necessarily apply to <text:span text:style-name="T14">all</text:span> apostles. <text:span text:style-name="T288">It’s either all or nothing here because otherwise it’s textbook cherry-picking.</text:span></text:p>
      <text:p text:style-name="P177"/>
      <text:p text:style-name="P178">Simple Example:</text:p>
      <text:p text:style-name="P178"/>
      <text:p text:style-name="Quotations">If a top-tier surgeon is defending his qualifications to a skeptical hospital board, he might say: "Am I not a world-class surgeon? Have I not won the Nobel Prize in Medicine?"</text:p>
      <text:p text:style-name="Quotations"/>
      <text:p text:style-name="Quotations">Does that mean that it is impossible to be a surgeon unless you win a Nobel Prize? No, <text:span text:style-name="T289">of course not.</text:span> The Nobel Prize is a unique, high-level validation of his personal status, not a baseline requirement for the entire medical profession. Paul saw Christ, which made his apostleship unique, but it doesn't change the baseline meaning of a "sent messenger."</text:p>
      <text:p text:style-name="P179"/>
      <text:p text:style-name="P179"/>
      <text:p text:style-name="P180">And lastly, the only proof that Paul actually offers of his apostleship is the Corinthians themselves:</text:p>
      <text:p text:style-name="P180"/>
      <text:p text:style-name="Quotations">“for <text:span text:style-name="T14">the seal of mine apostleship</text:span> are ye in the Lord.”</text:p>
      <text:p text:style-name="P179"/>
      <text:p text:style-name="P181"/>
      <text:p text:style-name="Horizontal_20_Line"/>
      <text:p text:style-name="P182"/>
      <text:p text:style-name="P183"><text:span text:style-name="T290"/></text:p>
      <text:p text:style-name="P184"/>
      <text:p text:style-name="P184"/>
      <text:p text:style-name="P184"/>
      <text:p text:style-name="P184"/>
      <text:p text:style-name="P184"/>
      <text:p text:style-name="P184"/>
      <text:p text:style-name="P184"/>
      <table:table table:name="Table2" table:style-name="Table2">
        <table:table-column table:style-name="Table2.A"/>
        <text:soft-page-break/>
        <table:table-row>
          <table:table-cell table:style-name="Table2.A1" office:value-type="string">
            <text:p text:style-name="P185">Revelation 2:1-3</text:p>
            <text:p text:style-name="P186"><text:span text:style-name="T40">1</text:span> <text:span text:style-name="T42">Unto the angel of the church of Ephesus write; These things saith he that holdeth the seven stars in his right hand, who walketh in the midst of the seven golden candlesticks;</text:span></text:p>
            <text:p text:style-name="P186"><text:span text:style-name="T40">2</text:span> <text:span text:style-name="T42">I know thy works, and thy labour, and thy patience, and how thou canst not bear them which are evil: and </text:span><text:span text:style-name="T39">thou hast tried them which say they are apostles, and are not, and hast found them liars</text:span><text:span text:style-name="T42">:</text:span></text:p>
            <text:p text:style-name="P186"><text:span text:style-name="T40">3</text:span> <text:span text:style-name="T42">And hast borne, and hast patience, and for my name's sake hast laboured, and hast not fainted.</text:span></text:p>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47">1 Corinthians 12:27-31</text:p>
            <text:p text:style-name="Table_20_Contents">27 Now <text:span text:style-name="T38">ye</text:span> are the body of Christ, and members in particular.</text:p>
            <text:p text:style-name="Table_20_Contents">28 And God hath set some <text:span text:style-name="T38">in the church</text:span>, first apostles, secondarily prophets, thirdly teachers, after that miracles, then gifts of healings, helps, governments, diversities of tongues.</text:p>
            <text:p text:style-name="Table_20_Contents">29 Are all apostles? are all prophets? are all teachers? are all workers of miracles?</text:p>
            <text:p text:style-name="Table_20_Contents">30 Have all the gifts of healing? do all speak with tongues? do all interpret?</text:p>
            <text:p text:style-name="Table_20_Contents">31 But covet earnestly the best gifts: and yet shew I unto you a more excellent way.</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officeooo:rsid="044c19dd"/>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98in"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0201in" fo:margin-bottom="0.0201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 style:font-family-complex="FreeSans" style:font-family-generic-complex="system" style:font-pitch-complex="variable" style:font-size-complex="18pt" style:font-weight-complex="600"/>
    </style:style>
    <style:style style:name="Quotations" style:family="paragraph" style:parent-style-name="Standard" style:class="html">
      <style:paragraph-properties fo:margin-left="0.3937in" fo:margin-right="0.3937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95in" style:type="center"/>
          <style:tab-stop style:position="7.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SC" style:font-family-asian="'Source Han Serif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Source Han Serif SC" style:font-family-asian="'Source Han Serif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usage="mirrored">
      <style:page-layout-properties fo:page-width="8.5in" fo:page-height="11in" style:num-format="1" style:print-orientation="portrait" fo:margin-top="0.1965in" fo:margin-bottom="0.196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ccccc" draw:fill-hatch-solid="false" draw:fill-image-width="9.4098in" draw:fill-image-height="9.4098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fill="none" draw:background-size="full" draw:fill-color="#cccccc" draw:fill-hatch-solid="false" draw:fill-image-width="9.4098in" draw:fill-image-height="9.4098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text:page-number text:select-page="current">16</text:page-number><text:s/>/ <text:page-count>16</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1T13:29:27.993245069</meta:creation-date>
    <dc:title>default</dc:title>
    <meta:editing-duration>P1DT23H36M53S</meta:editing-duration>
    <meta:editing-cycles>1398</meta:editing-cycles>
    <meta:generator>LibreOffice/26.2.4.2$Linux_X86_64 LibreOffice_project/64a984c51f4702dbd3710b13428c673a2f1292e7</meta:generator>
    <dc:date>2026-07-16T18:18:41.573652064</dc:date>
    <meta:print-date>2026-07-15T15:10:35.866769657</meta:print-date>
    <meta:printed-by>PDF files</meta:printed-by>
    <meta:document-statistic meta:table-count="21" meta:image-count="0" meta:object-count="0" meta:page-count="16" meta:paragraph-count="363" meta:word-count="6607" meta:character-count="39903" meta:non-whitespace-character-count="33708"/>
    <meta:template xlink:type="simple" xlink:actuate="onRequest" xlink:title="default" xlink:href="../../../../Templates/default.ott" meta:date="2026-07-11T13:29:25.811605187"/>
  </office:meta>
</office:document-meta>
</file>