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50000020A428C38E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3.95in" style:rel-column-width="32767*"/>
    </style:style>
    <style:style style:name="Table4.B" style:family="table-column">
      <style:table-column-properties style:column-width="3.9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2.633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left" style:justify-single-word="false"/>
      <style:text-properties officeooo:rsid="00321e63" officeooo:paragraph-rsid="00321e63"/>
    </style:style>
    <style:style style:name="P2" style:family="paragraph" style:parent-style-name="Standard">
      <style:paragraph-properties fo:text-align="left" style:justify-single-word="false"/>
      <style:text-properties officeooo:rsid="002b06a4" officeooo:paragraph-rsid="002b06a4"/>
    </style:style>
    <style:style style:name="P3" style:family="paragraph" style:parent-style-name="Standard">
      <style:text-properties officeooo:rsid="001f7fc0" officeooo:paragraph-rsid="001f7fc0"/>
    </style:style>
    <style:style style:name="P4" style:family="paragraph" style:parent-style-name="Standard" style:list-style-name="L1">
      <style:text-properties officeooo:rsid="001f7fc0" officeooo:paragraph-rsid="001f7fc0"/>
    </style:style>
    <style:style style:name="P5" style:family="paragraph" style:parent-style-name="Standard">
      <style:text-properties officeooo:paragraph-rsid="001ee49e"/>
    </style:style>
    <style:style style:name="P6" style:family="paragraph" style:parent-style-name="Table_20_Contents">
      <style:text-properties officeooo:paragraph-rsid="001ee49e"/>
    </style:style>
    <style:style style:name="P7" style:family="paragraph" style:parent-style-name="Standard" style:list-style-name="L2">
      <style:text-properties officeooo:rsid="001f7fc0" officeooo:paragraph-rsid="001f7fc0"/>
    </style:style>
    <style:style style:name="P8" style:family="paragraph" style:parent-style-name="Table_20_Contents">
      <style:text-properties officeooo:paragraph-rsid="001ee49e" fo:background-color="transparent"/>
    </style:style>
    <style:style style:name="P9" style:family="paragraph" style:parent-style-name="Standard">
      <style:text-properties officeooo:rsid="00212711" officeooo:paragraph-rsid="00212711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12711" officeooo:paragraph-rsid="0021271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12711" officeooo:paragraph-rsid="00212711"/>
    </style:style>
    <style:style style:name="P12" style:family="paragraph" style:parent-style-name="Standard">
      <style:text-properties officeooo:rsid="0036f889" officeooo:paragraph-rsid="0036f889"/>
    </style:style>
    <style:style style:name="P13" style:family="paragraph" style:parent-style-name="Standard">
      <style:text-properties officeooo:rsid="00632c1a" officeooo:paragraph-rsid="0036f889"/>
    </style:style>
    <style:style style:name="P14" style:family="paragraph" style:parent-style-name="Standard">
      <style:text-properties officeooo:rsid="003e98d9" officeooo:paragraph-rsid="0041ecf9"/>
    </style:style>
    <style:style style:name="P15" style:family="paragraph" style:parent-style-name="Standard">
      <style:text-properties officeooo:rsid="003e98d9" officeooo:paragraph-rsid="003e98d9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e98d9" officeooo:paragraph-rsid="003e98d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3e98d9" officeooo:paragraph-rsid="003e98d9"/>
    </style:style>
    <style:style style:name="P18" style:family="paragraph" style:parent-style-name="Standard">
      <style:text-properties officeooo:paragraph-rsid="0043b404"/>
    </style:style>
    <style:style style:name="P19" style:family="paragraph" style:parent-style-name="Standard">
      <style:paragraph-properties fo:text-align="center" style:justify-single-word="false"/>
      <style:text-properties officeooo:rsid="00212711" officeooo:paragraph-rsid="00212711"/>
    </style:style>
    <style:style style:name="P20" style:family="paragraph" style:parent-style-name="Standard">
      <style:text-properties officeooo:rsid="002d59a6" officeooo:paragraph-rsid="002d59a6"/>
    </style:style>
    <style:style style:name="P21" style:family="paragraph" style:parent-style-name="Standard">
      <style:text-properties officeooo:rsid="0055979e" officeooo:paragraph-rsid="0055979e"/>
    </style:style>
    <style:style style:name="P22" style:family="paragraph" style:parent-style-name="Standard">
      <style:text-properties officeooo:rsid="006826ec" officeooo:paragraph-rsid="006826ec"/>
    </style:style>
    <style:style style:name="P23" style:family="paragraph" style:parent-style-name="Standard">
      <style:text-properties officeooo:rsid="002bbfc1" officeooo:paragraph-rsid="002bbfc1"/>
    </style:style>
    <style:style style:name="P24" style:family="paragraph" style:parent-style-name="Standard">
      <style:text-properties officeooo:rsid="0047f4a0" officeooo:paragraph-rsid="0047f4a0"/>
    </style:style>
    <style:style style:name="T1" style:family="text">
      <style:text-properties fo:color="#127622" loext:opacity="100%"/>
    </style:style>
    <style:style style:name="T2" style:family="text">
      <style:text-properties officeooo:rsid="0032b169"/>
    </style:style>
    <style:style style:name="T3" style:family="text">
      <style:text-properties fo:color="#127622" loext:opacity="100%" officeooo:rsid="0032b169"/>
    </style:style>
    <style:style style:name="T4" style:family="text">
      <style:text-properties officeooo:rsid="0033a6a9"/>
    </style:style>
    <style:style style:name="T5" style:family="text">
      <style:text-properties fo:color="#127622" loext:opacity="100%" officeooo:rsid="0033a6a9"/>
    </style:style>
    <style:style style:name="T6" style:family="text">
      <style:text-properties officeooo:rsid="00343aba"/>
    </style:style>
    <style:style style:name="T7" style:family="text">
      <style:text-properties fo:color="#127622" loext:opacity="100%" officeooo:rsid="00343aba"/>
    </style:style>
    <style:style style:name="T8" style:family="text">
      <style:text-properties officeooo:rsid="00351212"/>
    </style:style>
    <style:style style:name="T9" style:family="text">
      <style:text-properties officeooo:rsid="00489afa"/>
    </style:style>
    <style:style style:name="T10" style:family="text">
      <style:text-properties officeooo:rsid="003122e0"/>
    </style:style>
    <style:style style:name="T11" style:family="text">
      <style:text-properties officeooo:rsid="0049a12e"/>
    </style:style>
    <style:style style:name="T12" style:family="text">
      <style:text-properties fo:font-weight="bold" officeooo:rsid="003122e0" style:font-weight-asian="bold" style:font-weight-complex="bold"/>
    </style:style>
    <style:style style:name="T13" style:family="text">
      <style:text-properties officeooo:rsid="0035eca1"/>
    </style:style>
    <style:style style:name="T14" style:family="text">
      <style:text-properties officeooo:rsid="003a5c79"/>
    </style:style>
    <style:style style:name="T15" style:family="text">
      <style:text-properties style:text-position="super 58%" officeooo:rsid="003a5c79"/>
    </style:style>
    <style:style style:name="T16" style:family="text">
      <style:text-properties officeooo:rsid="004a2f3e"/>
    </style:style>
    <style:style style:name="T17" style:family="text">
      <style:text-properties officeooo:rsid="003b330d"/>
    </style:style>
    <style:style style:name="T18" style:family="text">
      <style:text-properties fo:color="#127622" loext:opacity="100%" officeooo:rsid="00216c34"/>
    </style:style>
    <style:style style:name="T19" style:family="text">
      <style:text-properties officeooo:rsid="002705e6"/>
    </style:style>
    <style:style style:name="T20" style:family="text">
      <style:text-properties officeooo:rsid="00234623"/>
    </style:style>
    <style:style style:name="T21" style:family="text">
      <style:text-properties fo:background-color="transparent" loext:char-shading-value="0"/>
    </style:style>
    <style:style style:name="T22" style:family="text">
      <style:text-properties fo:font-weight="bold" fo:background-color="transparent" loext:char-shading-value="0" style:font-weight-asian="bold" style:font-weight-complex="bold"/>
    </style:style>
    <style:style style:name="T23" style:family="text">
      <style:text-properties officeooo:rsid="004b93ee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3bc20c"/>
    </style:style>
    <style:style style:name="T26" style:family="text">
      <style:text-properties officeooo:rsid="0023c2c1"/>
    </style:style>
    <style:style style:name="T27" style:family="text">
      <style:text-properties officeooo:rsid="002536ae"/>
    </style:style>
    <style:style style:name="T28" style:family="text">
      <style:text-properties fo:color="#127622" loext:opacity="100%" officeooo:rsid="001cb03b"/>
    </style:style>
    <style:style style:name="T29" style:family="text">
      <style:text-properties style:text-position="super 58%" officeooo:rsid="001cb03b"/>
    </style:style>
    <style:style style:name="T30" style:family="text">
      <style:text-properties officeooo:rsid="001cb03b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a9331"/>
    </style:style>
    <style:style style:name="T33" style:family="text">
      <style:text-properties officeooo:rsid="00265c50"/>
    </style:style>
    <style:style style:name="T34" style:family="text">
      <style:text-properties officeooo:rsid="003da205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36f889" style:font-size-asian="10pt" style:font-size-complex="10pt"/>
    </style:style>
    <style:style style:name="T37" style:family="text">
      <style:text-properties fo:font-size="10pt" officeooo:rsid="003ed6b1" style:font-size-asian="10pt" style:font-size-complex="10pt"/>
    </style:style>
    <style:style style:name="T38" style:family="text">
      <style:text-properties style:text-position="super 58%"/>
    </style:style>
    <style:style style:name="T39" style:family="text">
      <style:text-properties officeooo:rsid="0063c969"/>
    </style:style>
    <style:style style:name="T40" style:family="text">
      <style:text-properties officeooo:rsid="004f3fee"/>
    </style:style>
    <style:style style:name="T41" style:family="text">
      <style:text-properties officeooo:rsid="0041ecf9"/>
    </style:style>
    <style:style style:name="T42" style:family="text">
      <style:text-properties fo:color="#127622" loext:opacity="100%" officeooo:rsid="0041ecf9"/>
    </style:style>
    <style:style style:name="T43" style:family="text">
      <style:text-properties officeooo:rsid="0051c0c6"/>
    </style:style>
    <style:style style:name="T44" style:family="text">
      <style:text-properties officeooo:rsid="0043b404"/>
    </style:style>
    <style:style style:name="T45" style:family="text">
      <style:text-properties fo:color="#127622" loext:opacity="100%" officeooo:rsid="0043b404"/>
    </style:style>
    <style:style style:name="T46" style:family="text">
      <style:text-properties officeooo:rsid="00531477"/>
    </style:style>
    <style:style style:name="T47" style:family="text">
      <style:text-properties officeooo:rsid="00445803"/>
    </style:style>
    <style:style style:name="T48" style:family="text">
      <style:text-properties officeooo:rsid="0065da40"/>
    </style:style>
    <style:style style:name="T49" style:family="text">
      <style:text-properties fo:color="#127622" loext:opacity="100%" officeooo:rsid="0065da40"/>
    </style:style>
    <style:style style:name="T50" style:family="text">
      <style:text-properties fo:color="#127622" loext:opacity="100%" officeooo:rsid="0066b5cd"/>
    </style:style>
    <style:style style:name="T51" style:family="text">
      <style:text-properties officeooo:rsid="0058dbed"/>
    </style:style>
    <style:style style:name="T52" style:family="text">
      <style:text-properties officeooo:rsid="002bbfc1"/>
    </style:style>
    <style:style style:name="T53" style:family="text">
      <style:text-properties fo:color="#127622" loext:opacity="100%" officeooo:rsid="002bbfc1"/>
    </style:style>
    <style:style style:name="T54" style:family="text">
      <style:text-properties officeooo:rsid="005a69fe"/>
    </style:style>
    <style:style style:name="T55" style:family="text">
      <style:text-properties officeooo:rsid="00301b53"/>
    </style:style>
    <style:style style:name="T56" style:family="text">
      <style:text-properties officeooo:rsid="0069a67a"/>
    </style:style>
    <style:style style:name="T57" style:family="text">
      <style:text-properties fo:color="#127622" loext:opacity="100%" officeooo:rsid="0069a67a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201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ve you ever imagined that the cherubim on the Ark (<text:span text:style-name="T1">Exo 25:18</text:span>), in the oracle (<text:span text:style-name="T1">1Ki 6:23-28</text:span>), on the curtains (<text:span text:style-name="T1">Exo 26:1</text:span>), <text:span text:style-name="T2">the vail (</text:span><text:span text:style-name="T3">Exo 26:31</text:span><text:span text:style-name="T2">), </text:span><text:span text:style-name="T4">the walls (</text:span><text:span text:style-name="T5">1Ki 6:29</text:span><text:span text:style-name="T4">), the doors (</text:span><text:span text:style-name="T5">1Ki 6:32,35</text:span><text:span text:style-name="T4">), </text:span><text:span text:style-name="T6">the borders and plates of the bases (</text:span><text:span text:style-name="T7">1Ki 7:29,35</text:span><text:span text:style-name="T6">) </text:span><text:span text:style-name="T8">were depicted as winged men like the angels of modern iconography?</text:span></text:p>
      <text:p text:style-name="P1"/>
      <text:p text:style-name="P2">In the visions of the prophet <text:span text:style-name="T1">Ezekiel</text:span> we’re given an interesting <text:span text:style-name="T9">parallel</text:span> that can be easy to miss. <text:span text:style-name="T10">But, that detail is </text:span><text:span text:style-name="T11">what is</text:span><text:span text:style-name="T10"> integral for dismantling </text:span><text:span text:style-name="T12">centuries</text:span><text:span text:style-name="T10"> of </text:span><text:span text:style-name="T13">mistranslation</text:span><text:span text:style-name="T10"> </text:span><text:span text:style-name="T14">(3</text:span><text:span text:style-name="T15">rd</text:span><text:span text:style-name="T14"> century AD Rabbinic traditions) </text:span><text:span text:style-name="T10">and </text:span><text:span text:style-name="T16">worldly influence</text:span><text:span text:style-name="T10"> </text:span><text:span text:style-name="T14">(Greco-Roman; </text:span><text:span text:style-name="T17">Eros, Cupid, Nike</text:span><text:span text:style-name="T14">) </text:span><text:span text:style-name="T10">as to what a Cherub (singular) or Cherubim (plural) actually looked like.</text:span></text:p>
      <text:p text:style-name="Standard"/>
      <text:p text:style-name="P3">In <text:span text:style-name="T1">Eze</text:span><text:span text:style-name="T18">kiel</text:span><text:span text:style-name="T1"> 10:14</text:span> <text:span text:style-name="T19">it is written</text:span> that the living creatures had four faces:</text:p>
      <text:list text:style-name="L1">
        <text:list-item>
          <text:p text:style-name="P4"><text:span text:style-name="T20">a </text:span>Cherub</text:p>
        </text:list-item>
        <text:list-item>
          <text:p text:style-name="P4"><text:span text:style-name="T20">a </text:span>Man</text:p>
        </text:list-item>
        <text:list-item>
          <text:p text:style-name="P4"><text:span text:style-name="T20">a </text:span>Lion</text:p>
        </text:list-item>
        <text:list-item>
          <text:p text:style-name="P4"><text:span text:style-name="T20">an </text:span>Eagle</text:p>
        </text:list-item>
      </text:list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1">Ezekiel 10:14</text:span><text:line-break/><text:span text:style-name="T21">And every one had four faces: the first face was the face of a </text:span><text:span text:style-name="T22">cherub</text:span><text:span text:style-name="T21">, and the second face was the face of a </text:span><text:span text:style-name="T22">man</text:span><text:span text:style-name="T21">, and the third the face of a </text:span><text:span text:style-name="T22">lion</text:span><text:span text:style-name="T21">, and the fourth the face of an </text:span><text:span text:style-name="T22">eagle</text:span><text:span text:style-name="T21">.</text:span></text:p>
          </table:table-cell>
        </table:table-row>
      </table:table>
      <text:p text:style-name="P5"/>
      <text:p text:style-name="P3">Then, 8 verses later we’re told that their faces are <text:span text:style-name="T23">exactly </text:span>the same as the faces of the living creatures in <text:span text:style-name="T1">Ezekiel</text:span> chapter 1: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Ezekiel 10:22</text:span><text:line-break/>And the likeness of their faces was <text:span text:style-name="T24">the same faces which I saw by the river of Chebar</text:span>, their appearances and themselves: they went every one straight forward.</text:p>
          </table:table-cell>
        </table:table-row>
      </table:table>
      <text:p text:style-name="Standard"/>
      <text:p text:style-name="P3"><text:span text:style-name="T25">Now</text:span>, if we look back to chapter <text:span text:style-name="T26">1</text:span> the list of faces is slightly different:</text:p>
      <text:list text:style-name="L2">
        <text:list-item>
          <text:p text:style-name="P7"><text:span text:style-name="T27">a </text:span>Man</text:p>
        </text:list-item>
        <text:list-item>
          <text:p text:style-name="P7"><text:span text:style-name="T27">a </text:span>Lion</text:p>
        </text:list-item>
        <text:list-item>
          <text:p text:style-name="P7"><text:span text:style-name="T27">an </text:span>Ox</text:p>
        </text:list-item>
        <text:list-item>
          <text:p text:style-name="P7"><text:span text:style-name="T27">an </text:span>Eagle</text:p>
        </text:list-item>
      </text:list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Ezekiel 1:</text:span><text:span text:style-name="T28">1,</text:span><text:span text:style-name="T1">10</text:span><text:line-break/><text:span text:style-name="T29">1</text:span><text:span text:style-name="T30"> </text:span>Now it came to pass in the thirtieth year, in the fourth month, in the fifth day of the month, as I was among the captives by the river of Chebar, that the heavens were opened, and I saw visions of God.</text:p>
            <text:p text:style-name="P8"><text:line-break/><text:span text:style-name="T29">10</text:span><text:span text:style-name="T30"> </text:span>As for the likeness of their faces, they four had the face of a <text:span text:style-name="T31">man</text:span>, and the face of a <text:span text:style-name="T31">lion</text:span>, on the right side: and they four had the face of an <text:span text:style-name="T31">ox</text:span> on the left side; they four also had the face of an <text:span text:style-name="T31">eagle</text:span>.</text:p>
          </table:table-cell>
        </table:table-row>
      </table:table>
      <text:p text:style-name="Standard"/>
      <text:p text:style-name="P9">And since we’re told the faces are the same, but one of them is called by two different names, this <text:span text:style-name="T32">teaches</text:span> us <text:span text:style-name="T33">what the face of the cherub looked like: an ox!</text:span>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Ezekiel 1</text:p>
          </table:table-cell>
          <table:table-cell table:style-name="Table4.B1" office:value-type="string">
            <text:p text:style-name="P10">Ezekiel 10</text:p>
          </table:table-cell>
        </table:table-row>
        <table:table-row>
          <table:table-cell table:style-name="Table4.A2" office:value-type="string">
            <text:p text:style-name="P11">Cherub</text:p>
          </table:table-cell>
          <table:table-cell table:style-name="Table4.B2" office:value-type="string">
            <text:p text:style-name="P11">Ox</text:p>
          </table:table-cell>
        </table:table-row>
        <table:table-row>
          <table:table-cell table:style-name="Table4.A2" office:value-type="string">
            <text:p text:style-name="P11">Man</text:p>
          </table:table-cell>
          <table:table-cell table:style-name="Table4.B2" office:value-type="string">
            <text:p text:style-name="P11">Man</text:p>
          </table:table-cell>
        </table:table-row>
        <table:table-row>
          <table:table-cell table:style-name="Table4.A2" office:value-type="string">
            <text:p text:style-name="P11">Lion</text:p>
          </table:table-cell>
          <table:table-cell table:style-name="Table4.B2" office:value-type="string">
            <text:p text:style-name="P11">Lion</text:p>
          </table:table-cell>
        </table:table-row>
        <table:table-row>
          <table:table-cell table:style-name="Table4.A2" office:value-type="string">
            <text:p text:style-name="P11">Eagle</text:p>
          </table:table-cell>
          <table:table-cell table:style-name="Table4.B2" office:value-type="string">
            <text:p text:style-name="P11">Eagle</text:p>
          </table:table-cell>
        </table:table-row>
      </table:table>
      <text:p text:style-name="P12"/>
      <text:p text:style-name="P12"/>
      <text:p text:style-name="P12"><text:soft-page-break/>Now that we know what the cherubim <text:span text:style-name="T34">actually </text:span>looked like, suddenly the architecture elsewhere starts to make more sense:</text:p>
      <text:p text:style-name="P12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">1 Kings 7:23-25</text:span><text:span text:style-name="T35"> </text:span><text:span text:style-name="T36">(the </text:span><text:span text:style-name="T37">brass </text:span><text:span text:style-name="T36">laver of Solomon’s temple)</text:span><text:line-break/><text:span text:style-name="T38">23</text:span> And he made a molten sea, ten cubits from the one brim to the other: it was round all about, and his height was five cubits: and a line of thirty cubits did compass it round about.<text:line-break/><text:span text:style-name="T38">24</text:span> And under the brim of it round about there were knops compassing it, ten in a cubit, compassing the sea round about: the knops were cast in two rows, when it was cast.<text:line-break/><text:span text:style-name="T38">25</text:span> <text:span text:style-name="T24">It stood upon twelve oxen</text:span>, three looking toward the north, and three looking toward the west, and three looking toward the south, and three looking toward the east: and the sea was set above upon them, and all their hinder parts were inward.</text:p>
          </table:table-cell>
        </table:table-row>
      </table:table>
      <text:p text:style-name="P13"/>
      <text:p text:style-name="P12"/>
      <text:p text:style-name="P14"><text:span text:style-name="T39">E</text:span>lsewhere in tradition, we learn that the standards of each <text:span text:style-name="T40">tribal </text:span>camp <text:span text:style-name="T41">around the tabernacle (</text:span><text:span text:style-name="T42">Numbers 2</text:span><text:span text:style-name="T41">) </text:span><text:span text:style-name="T43">line up perfectly with the Bible in ways we might not expect:</text:span></text:p>
      <text:p text:style-name="P15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6">Camped around the tabernacle</text:p>
          </table:table-cell>
          <table:table-cell table:style-name="Table8.A1" office:value-type="string">
            <text:p text:style-name="P16">Tribe</text:p>
          </table:table-cell>
          <table:table-cell table:style-name="Table8.C1" office:value-type="string">
            <text:p text:style-name="P16">Standard</text:p>
          </table:table-cell>
        </table:table-row>
        <table:table-row>
          <table:table-cell table:style-name="Table8.A2" office:value-type="string">
            <text:p text:style-name="P17">East</text:p>
          </table:table-cell>
          <table:table-cell table:style-name="Table8.A2" office:value-type="string">
            <text:p text:style-name="P17">Judah</text:p>
          </table:table-cell>
          <table:table-cell table:style-name="Table8.C2" office:value-type="string">
            <text:p text:style-name="P17">Lion</text:p>
          </table:table-cell>
        </table:table-row>
        <table:table-row>
          <table:table-cell table:style-name="Table8.A2" office:value-type="string">
            <text:p text:style-name="P17">West</text:p>
          </table:table-cell>
          <table:table-cell table:style-name="Table8.A2" office:value-type="string">
            <text:p text:style-name="P17">Ephraim</text:p>
          </table:table-cell>
          <table:table-cell table:style-name="Table8.C2" office:value-type="string">
            <text:p text:style-name="P17">Ox</text:p>
          </table:table-cell>
        </table:table-row>
        <table:table-row>
          <table:table-cell table:style-name="Table8.A2" office:value-type="string">
            <text:p text:style-name="P17">South</text:p>
          </table:table-cell>
          <table:table-cell table:style-name="Table8.A2" office:value-type="string">
            <text:p text:style-name="P17">Reuben</text:p>
          </table:table-cell>
          <table:table-cell table:style-name="Table8.C2" office:value-type="string">
            <text:p text:style-name="P17">Man</text:p>
          </table:table-cell>
        </table:table-row>
        <table:table-row>
          <table:table-cell table:style-name="Table8.A2" office:value-type="string">
            <text:p text:style-name="P17">North</text:p>
          </table:table-cell>
          <table:table-cell table:style-name="Table8.A2" office:value-type="string">
            <text:p text:style-name="P17">Dan</text:p>
          </table:table-cell>
          <table:table-cell table:style-name="Table8.C2" office:value-type="string">
            <text:p text:style-name="P17">Eagle</text:p>
          </table:table-cell>
        </table:table-row>
      </table:table>
      <text:p text:style-name="P15"/>
      <text:p text:style-name="P18"><text:span text:style-name="T44">Now, if we take the tribal encampments from </text:span><text:span text:style-name="T45">Numbers 2</text:span><text:span text:style-name="T44"> and line them up with the </text:span><text:span text:style-name="T46">details</text:span><text:span text:style-name="T44"> given in </text:span><text:span text:style-name="T45">Ezekiel</text:span>’s<text:span text:style-name="T44"> vision in chapter 1 </text:span><text:span text:style-name="T47">you’ll notice that they perfectly align with the faces of the living creatures:</text:span></text:p>
      <text:p text:style-name="P9"/>
      <text:p text:style-name="P19"><draw:frame draw:style-name="fr1" draw:name="Image1" text:anchor-type="as-char" svg:width="5.6417in" svg:height="4.35in" draw:z-index="0"><draw:image xlink:href="Pictures/10000000000002A50000020A428C38EE.png" xlink:type="simple" xlink:show="embed" xlink:actuate="onLoad" draw:mime-type="image/png"/></draw:frame></text:p>
      <text:p text:style-name="P20"/>
      <text:p text:style-name="P20"/>
      <text:p text:style-name="P21">Coincidence? I trow not <text:span text:style-name="T48">(</text:span><text:span text:style-name="T49">Hebrew</text:span><text:span text:style-name="T50">s</text:span><text:span text:style-name="T49"> 10:1</text:span><text:span text:style-name="T48">)</text:span></text:p>
      <text:p text:style-name="P20"><text:soft-page-break/>There is also an<text:span text:style-name="T51">other </text:span>interesting “parallel” in the last book of the Bible. I<text:span text:style-name="T52">n </text:span><text:span text:style-name="T53">Ezekiel</text:span><text:span text:style-name="T52">, each of the four living creatures has four faces. But, in </text:span><text:span text:style-name="T53">Revelation</text:span><text:span text:style-name="T52"> each “face” is it’s own individual </text:span><text:span text:style-name="T54">beast</text:span><text:span text:style-name="T52"> </text:span><text:span text:style-name="T55">around the throne of God.</text:span></text:p>
      <text:p text:style-name="P20"/>
      <text:p text:style-name="P22">In <text:span text:style-name="T1">Ezekiel</text:span>, each living creature is below the firmament which <text:span text:style-name="T56">the throne is inside of (</text:span><text:span text:style-name="T57">Eze 10:1-4</text:span><text:span text:style-name="T56">)</text:span>. In <text:span text:style-name="T1">Revelation</text:span>, each beast is around the throne.</text:p>
      <text:p text:style-name="P23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Revelation 4:6-7</text:span><text:line-break/><text:span text:style-name="T38">6</text:span> And before the throne there was a sea of glass like unto crystal: and in the midst of the throne, and round about the throne, were four beasts full of eyes before and behind.<text:line-break/><text:span text:style-name="T38">7</text:span> And the first beast was like a <text:span text:style-name="T31">lion</text:span>, and the second beast like a <text:span text:style-name="T31">calf</text:span>, and the third beast had a face as a <text:span text:style-name="T31">man</text:span>, and the fourth beast was like a flying <text:span text:style-name="T31">eagle</text:span>.</text:p>
          </table:table-cell>
        </table:table-row>
      </table:table>
      <text:p text:style-name="P9"/>
      <text:p text:style-name="P24">And assuming these also align with <text:span text:style-name="T1">Ezekiel</text:span>’s vision, and the tribal encampments, they are listed in this order: East, West, South, Nort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5:09:44.816615400</meta:creation-date>
    <dc:title>default</dc:title>
    <meta:editing-duration>PT3H55M16S</meta:editing-duration>
    <meta:editing-cycles>83</meta:editing-cycles>
    <meta:generator>LibreOffice/26.2.1.2$Windows_X86_64 LibreOffice_project/620$Build-2</meta:generator>
    <dc:date>2026-03-26T11:09:33.080988000</dc:date>
    <meta:print-date>2026-03-25T18:01:57.109475300</meta:print-date>
    <meta:printed-by>PDF files</meta:printed-by>
    <meta:document-statistic meta:table-count="7" meta:image-count="1" meta:object-count="0" meta:page-count="3" meta:paragraph-count="53" meta:word-count="786" meta:character-count="4139" meta:non-whitespace-character-count="3412"/>
    <meta:template xlink:type="simple" xlink:actuate="onRequest" xlink:title="default" xlink:href="../../../../AppData/Roaming/LibreOffice/4/user/template/default1.ott" meta:date="2026-03-25T15:09:44.669139100"/>
  </office:meta>
</office:document-meta>
</file>