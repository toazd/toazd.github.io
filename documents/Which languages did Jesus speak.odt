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>
      <style:text-properties fo:color="#127622" loext:opacity="100%" officeooo:paragraph-rsid="001347e4"/>
    </style:style>
    <style:style style:name="P2" style:family="paragraph" style:parent-style-name="Table_20_Contents">
      <style:text-properties officeooo:paragraph-rsid="001347e4"/>
    </style:style>
    <style:style style:name="P3" style:family="paragraph" style:parent-style-name="Table_20_Contents" style:list-style-name="L1">
      <style:text-properties officeooo:rsid="0013673e" officeooo:paragraph-rsid="0013673e"/>
    </style:style>
    <style:style style:name="P4" style:family="paragraph" style:parent-style-name="Table_20_Contents" style:list-style-name="L1">
      <style:text-properties officeooo:rsid="0015656d" officeooo:paragraph-rsid="0015656d"/>
    </style:style>
    <style:style style:name="P5" style:family="paragraph" style:parent-style-name="Table_20_Contents" style:list-style-name="L2">
      <style:text-properties officeooo:rsid="001347e4" officeooo:paragraph-rsid="001347e4"/>
    </style:style>
    <style:style style:name="P6" style:family="paragraph" style:parent-style-name="Table_20_Contents" style:list-style-name="L2">
      <style:text-properties officeooo:rsid="0015656d" officeooo:paragraph-rsid="0015656d"/>
    </style:style>
    <style:style style:name="P7" style:family="paragraph" style:parent-style-name="Table_20_Contents" style:list-style-name="L2">
      <style:text-properties officeooo:rsid="0015bb2b" officeooo:paragraph-rsid="0015bb2b"/>
    </style:style>
    <style:style style:name="P8" style:family="paragraph" style:parent-style-name="Table_20_Contents" style:list-style-name="L2">
      <style:text-properties officeooo:rsid="00179928" officeooo:paragraph-rsid="00179928"/>
    </style:style>
    <style:style style:name="P9" style:family="paragraph" style:parent-style-name="Table_20_Contents">
      <style:text-properties officeooo:rsid="001347e4" officeooo:paragraph-rsid="001347e4"/>
    </style:style>
    <style:style style:name="P10" style:family="paragraph" style:parent-style-name="Table_20_Contents">
      <style:text-properties fo:color="#127622" loext:opacity="100%" officeooo:paragraph-rsid="0018fc29"/>
    </style:style>
    <style:style style:name="P11" style:family="paragraph" style:parent-style-name="Table_20_Contents">
      <style:text-properties officeooo:paragraph-rsid="0018fc29"/>
    </style:style>
    <style:style style:name="P12" style:family="paragraph" style:parent-style-name="Table_20_Contents" style:list-style-name="L3">
      <style:text-properties officeooo:rsid="001b2f79" officeooo:paragraph-rsid="001b2f79"/>
    </style:style>
    <style:style style:name="P13" style:family="paragraph" style:parent-style-name="Table_20_Contents" style:list-style-name="L3">
      <style:text-properties officeooo:rsid="001b70f9" officeooo:paragraph-rsid="001b70f9"/>
    </style:style>
    <style:style style:name="P14" style:family="paragraph" style:parent-style-name="Table_20_Contents">
      <style:text-properties officeooo:rsid="001b70f9" officeooo:paragraph-rsid="001b70f9"/>
    </style:style>
    <style:style style:name="P15" style:family="paragraph" style:parent-style-name="Table_20_Contents">
      <style:text-properties officeooo:rsid="001d178a" officeooo:paragraph-rsid="001d178a"/>
    </style:style>
    <style:style style:name="T1" style:family="text">
      <style:text-properties fo:color="#ff0000" loext:opacity="100%"/>
    </style:style>
    <style:style style:name="T2" style:family="text">
      <style:text-properties style:use-window-font-color="true" loext:opacity="0%" style:text-position="super 58%" officeooo:rsid="001347e4"/>
    </style:style>
    <style:style style:name="T3" style:family="text">
      <style:text-properties officeooo:rsid="0015656d"/>
    </style:style>
    <style:style style:name="T4" style:family="text">
      <style:text-properties officeooo:rsid="0015bb2b"/>
    </style:style>
    <style:style style:name="T5" style:family="text">
      <style:text-properties officeooo:rsid="00179928"/>
    </style:style>
    <style:style style:name="T6" style:family="text">
      <style:text-properties style:use-window-font-color="true" loext:opacity="0%" style:text-position="super 58%" officeooo:rsid="001a19d4"/>
    </style:style>
    <style:style style:name="T7" style:family="text">
      <style:text-properties officeooo:rsid="001b2f7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Matthew 27:46</text:p>
            <text:p text:style-name="P2">And about the ninth hour Jesus cried with a loud voice, saying, <text:span text:style-name="T1">Eli</text:span><text:span text:style-name="T2">G2241</text:span><text:span text:style-name="T1">, Eli</text:span><text:span text:style-name="T2">G2241</text:span><text:span text:style-name="T1">, lama</text:span><text:span text:style-name="T2">G2982</text:span><text:span text:style-name="T1"> sabachthani</text:span><text:span text:style-name="T2">G4518</text:span><text:span text:style-name="T1">?</text:span> that is to say, My God, my God, why hast thou forsaken me?</text:p>
          </table:table-cell>
        </table:table-row>
      </table:table>
      <text:list text:style-name="L1">
        <text:list-item>
          <text:p text:style-name="P3">G2241 - of Hebrew origin</text:p>
        </text:list-item>
        <text:list-item>
          <text:p text:style-name="P3">G2982 – <text:span text:style-name="T3">of Hebrew origin</text:span></text:p>
        </text:list-item>
        <text:list-item>
          <text:p text:style-name="P4">G4518 – Chaldee (Aramaic)</text:p>
        </text:list-item>
      </text:list>
      <text:p text:style-name="Table_20_Contents"/>
      <text:p text:style-name="Table_20_Contents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Mark 15:34</text:p>
            <text:p text:style-name="P2">And at the ninth hour Jesus cried with a loud voice, saying, <text:span text:style-name="T1">Eloi</text:span><text:span text:style-name="T2">G1682</text:span><text:span text:style-name="T1">, Eloi</text:span><text:span text:style-name="T2">G1682</text:span><text:span text:style-name="T1">, lama</text:span><text:span text:style-name="T2">G2982</text:span><text:span text:style-name="T1"> sabachthani</text:span><text:span text:style-name="T2">G4518</text:span><text:span text:style-name="T1">?</text:span> which is, being interpreted, My God, my God, why hast thou forsaken me?</text:p>
          </table:table-cell>
        </table:table-row>
      </table:table>
      <text:list text:style-name="L2">
        <text:list-item>
          <text:p text:style-name="P5">Eloi is the Aramaic (Chaldean) form of Eli (God)</text:p>
        </text:list-item>
        <text:list-item>
          <text:p text:style-name="P6">G1682 – <text:span text:style-name="T4">Chaldee (Aramaic)</text:span></text:p>
        </text:list-item>
        <text:list-item>
          <text:p text:style-name="P7">G2982 – <text:span text:style-name="T5">Hebrew</text:span></text:p>
        </text:list-item>
        <text:list-item>
          <text:p text:style-name="P8">G4518 – Chaldee (Aramaic)</text:p>
        </text:list-item>
      </text:list>
      <text:p text:style-name="P9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Mark 5:41</text:p>
            <text:p text:style-name="P11">And he took the damsel by the hand, and said unto her, <text:span text:style-name="T1">Talitha</text:span><text:span text:style-name="T6">G5008</text:span><text:span text:style-name="T1"> cumi</text:span><text:span text:style-name="T6">G2891</text:span><text:span text:style-name="T1">;</text:span> which is, being interpreted, Damsel, I say unto thee, arise.</text:p>
          </table:table-cell>
        </table:table-row>
      </table:table>
      <text:list text:style-name="L3">
        <text:list-item>
          <text:p text:style-name="P12">G5008 – Chaldee (Aramaic)</text:p>
        </text:list-item>
        <text:list-item>
          <text:p text:style-name="P13">G2891 - <text:span text:style-name="T7">Chaldee (Aramaic)</text:span></text:p>
        </text:list-item>
      </text:list>
      <text:p text:style-name="P14"/>
      <text:p text:style-name="P14"/>
      <text:p text:style-name="P15">Pontius Pilate and Syrophenician woman: no translator present that we know of. So, Jesus probably spoke their native language which was Gree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3:58:44.702822100</meta:creation-date>
    <dc:title>default</dc:title>
    <meta:editing-duration>PT23M11S</meta:editing-duration>
    <meta:editing-cycles>12</meta:editing-cycles>
    <meta:generator>LibreOffice/25.8.2.2$Windows_X86_64 LibreOffice_project/d401f2107ccab8f924a8e2df40f573aab7605b6f</meta:generator>
    <meta:initial-creator>William K. McDannell Jr.</meta:initial-creator>
    <dc:date>2025-10-14T14:22:00.697179400</dc:date>
    <dc:creator>William K. McDannell Jr.</dc:creator>
    <meta:document-statistic meta:table-count="3" meta:image-count="0" meta:object-count="0" meta:page-count="1" meta:paragraph-count="16" meta:word-count="155" meta:character-count="909" meta:non-whitespace-character-count="773"/>
    <meta:template xlink:type="simple" xlink:actuate="onRequest" xlink:title="default" xlink:href="../../../../AppData/Roaming/LibreOffice/4/user/template/default.ott" meta:date="2025-10-14T13:58:43.707099200"/>
  </office:meta>
</office:document-meta>
</file>