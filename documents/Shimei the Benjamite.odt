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2701in" table:align="margins" style:may-break-between-rows="true" table:border-model="collapsing"/>
    </style:style>
    <style:style style:name="Table1.A" style:family="table-column">
      <style:table-column-properties style:column-width="5.6035in" style:rel-column-width="50511*"/>
    </style:style>
    <style:style style:name="Table1.B" style:family="table-column">
      <style:table-column-properties style:column-width="1.6667in" style:rel-column-width="1502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color="#127622" loext:opacity="100%" style:font-name="Gabriela Nerd Fon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T1" style:family="text">
      <style:text-properties fo:background-color="#fff5ce" loext:char-shading-value="0"/>
    </style:style>
    <style:style style:name="T2" style:family="text">
      <style:text-properties fo:color="#127622" loext:opacity="100%" style:font-name="Gabriela Nerd Font"/>
    </style:style>
    <style:style style:name="T3" style:family="text">
      <style:text-properties style:text-position="33% 80%"/>
    </style:style>
    <style:style style:name="T4" style:family="text">
      <style:text-properties fo:font-style="italic"/>
    </style:style>
    <style:style style:name="T5" style:family="text">
      <style:text-properties officeooo:rsid="004a8758"/>
    </style:style>
    <style:style style:name="T6" style:family="text">
      <style:text-properties officeooo:rsid="00491b9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Esther 2:5</text:p>
            <text:p text:style-name="Standard">Now in Shushan the palace there was a certain Jew, whose name was Mordecai, the son of Jair, the son of <text:span text:style-name="T1">Shimei</text:span>, the son of <text:span text:style-name="T1">Kish</text:span>, a Benjamite;</text:p>
          </table:table-cell>
          <table:table-cell table:style-name="Table1.B1" office:value-type="string">
            <text:list text:style-name="L1">
              <text:list-item>
                <text:p text:style-name="P2">Abraham</text:p>
              </text:list-item>
              <text:list-item>
                <text:p text:style-name="P2">Isaac</text:p>
              </text:list-item>
              <text:list-item>
                <text:p text:style-name="P2">Israel</text:p>
              </text:list-item>
              <text:list-item>
                <text:p text:style-name="P2">Benjamin</text:p>
              </text:list-item>
              <text:list-item>
                <text:p text:style-name="P2">Kish</text:p>
              </text:list-item>
              <text:list-item>
                <text:p text:style-name="P2">Shimei</text:p>
              </text:list-item>
              <text:list-item>
                <text:p text:style-name="P2">Jair</text:p>
              </text:list-item>
              <text:list-item>
                <text:p text:style-name="P2">Mordecai</text:p>
              </text:list-item>
            </text:list>
          </table:table-cell>
        </table:table-row>
        <table:table-row>
          <table:table-cell table:style-name="Table1.A2" office:value-type="string">
            <text:p text:style-name="Standard"><text:span text:style-name="T2">1 Chronicles 9:35-39</text:span><text:line-break/><text:span text:style-name="T3">35</text:span> And in Gibeon dwelt the father of Gibeon, <text:span text:style-name="T1">Jehiel</text:span>, whose wife's name <text:span text:style-name="T4">was</text:span> Maachah:<text:line-break/><text:span text:style-name="T3">36</text:span> And his firstborn son Abdon, then Zur, and <text:span text:style-name="T1">Kish</text:span>, and Baal, and <text:span text:style-name="T1">Ner</text:span>, and Nadab,<text:line-break/><text:span text:style-name="T3">37</text:span> And Gedor, and Ahio, and Zechariah, and Mikloth.<text:line-break/><text:span text:style-name="T3">38</text:span> And Mikloth begat Shimeam. And they also dwelt with their brethren at Jerusalem, over against their brethren.<text:line-break/><text:span text:style-name="T3">39</text:span> And <text:span text:style-name="T1">Ner</text:span> begat <text:span text:style-name="T1">Kish</text:span>; and <text:span text:style-name="T1">Kish</text:span> begat <text:span text:style-name="T1">Saul</text:span>; and <text:span text:style-name="T1">Saul</text:span> begat Jonathan, and Malchi-shua, and Abinadab, and Esh-baal.</text:p>
          </table:table-cell>
          <table:table-cell table:style-name="Table1.B2" office:value-type="string">
            <text:list text:style-name="L2">
              <text:list-item>
                <text:p text:style-name="P3">Abraham</text:p>
              </text:list-item>
              <text:list-item>
                <text:p text:style-name="P3">Isaac</text:p>
              </text:list-item>
              <text:list-item>
                <text:p text:style-name="P3">Israel</text:p>
              </text:list-item>
              <text:list-item>
                <text:p text:style-name="P3">Benjamin</text:p>
              </text:list-item>
              <text:list-item>
                <text:p text:style-name="P3">Jehiel</text:p>
              </text:list-item>
              <text:list-item>
                <text:p text:style-name="P3">Ner</text:p>
              </text:list-item>
              <text:list-item>
                <text:p text:style-name="P3">Kish</text:p>
              </text:list-item>
              <text:list-item>
                <text:p text:style-name="P3">Saul</text:p>
              </text:list-item>
              <text:list-item>
                <text:p text:style-name="P3">Shimei</text:p>
              </text:list-item>
              <text:list-item>
                <text:p text:style-name="P3">Jair</text:p>
              </text:list-item>
              <text:list-item>
                <text:p text:style-name="P3">Mordecai</text:p>
              </text:list-item>
            </text:list>
          </table:table-cell>
        </table:table-row>
        <table:table-row>
          <table:table-cell table:style-name="Table1.A2" office:value-type="string">
            <text:p text:style-name="P1">II Samuel 16:5</text:p>
            <text:p text:style-name="Standard">And when king David came to Bahurim, behold, thence came out a man of the family <text:span text:style-name="T1">of the house of Saul</text:span>, whose name was <text:span text:style-name="T1">Shimei</text:span>, the son of <text:span text:style-name="T1">Gera</text:span>: he came forth, and cursed still as he came.</text:p>
          </table:table-cell>
          <table:table-cell table:style-name="Table1.B2" office:value-type="string">
            <text:list text:style-name="L3">
              <text:list-item>
                <text:p text:style-name="P4">Abraham</text:p>
              </text:list-item>
              <text:list-item>
                <text:p text:style-name="P4">Isaac</text:p>
              </text:list-item>
              <text:list-item>
                <text:p text:style-name="P4">Israel</text:p>
              </text:list-item>
              <text:list-item>
                <text:p text:style-name="P4">Benjamin</text:p>
              </text:list-item>
              <text:list-item>
                <text:p text:style-name="P4">Jehiel</text:p>
              </text:list-item>
              <text:list-item>
                <text:p text:style-name="P4">Ner</text:p>
              </text:list-item>
              <text:list-item>
                <text:p text:style-name="P4">Kish</text:p>
              </text:list-item>
              <text:list-item>
                <text:p text:style-name="P4">Saul</text:p>
              </text:list-item>
              <text:list-item>
                <text:p text:style-name="P4">Gera</text:p>
              </text:list-item>
              <text:list-item>
                <text:p text:style-name="P4">Shimei</text:p>
              </text:list-item>
              <text:list-item>
                <text:p text:style-name="P4">Jair</text:p>
              </text:list-item>
              <text:list-item>
                <text:p text:style-name="P4">Mordecai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">Genesis 46:21</text:p>
            <text:p text:style-name="Standard">And the sons of Benjamin were <text:span text:style-name="T1">Belah</text:span>, and Becher, and Ashbel, Gera, and Naaman, Ehi, and Rosh, Muppim, and Huppim, and Ard.</text:p>
            <text:p text:style-name="Standard"><text:line-break/><text:span text:style-name="T2">1 Chronicles 8:1-5</text:span><text:line-break/><text:span text:style-name="T3">1</text:span> Now Benjamin begat <text:span text:style-name="T1">Bela</text:span> his firstborn, Ashbel the second, and Aharah the third,<text:line-break/><text:span text:style-name="T3">2</text:span> Nohah the fourth, and Rapha the fifth.<text:line-break/><text:span text:style-name="T3">3</text:span> And the sons of <text:span text:style-name="T1">Bela</text:span> were, Addar, and <text:span text:style-name="T1">Gera</text:span>, and Abihud,<text:line-break/><text:span text:style-name="T3">4</text:span> And Abishua, and Naaman, and Ahoah,<text:line-break/><text:span text:style-name="T3">5</text:span> And <text:span text:style-name="T1">Gera</text:span>, and Shephuphan, and Huram.</text:p>
          </table:table-cell>
          <table:table-cell table:style-name="Table1.B2" office:value-type="string">
            <text:list text:style-name="L4">
              <text:list-item>
                <text:p text:style-name="P5">Abraham</text:p>
              </text:list-item>
              <text:list-item>
                <text:p text:style-name="P5">Isaac</text:p>
              </text:list-item>
              <text:list-item>
                <text:p text:style-name="P5">Israel</text:p>
              </text:list-item>
              <text:list-item>
                <text:p text:style-name="P5">Benjamin</text:p>
              </text:list-item>
              <text:list-item>
                <text:p text:style-name="P5">Bela / <text:span text:style-name="T5">Belah</text:span></text:p>
              </text:list-item>
              <text:list-item>
                <text:p text:style-name="P5">Gera <text:span text:style-name="T6">&amp; Gera</text:span></text:p>
              </text:list-item>
              <text:list-item>
                <text:p text:style-name="P5">Jehiel</text:p>
              </text:list-item>
              <text:list-item>
                <text:p text:style-name="P5">Ner</text:p>
              </text:list-item>
              <text:list-item>
                <text:p text:style-name="P5">Kish</text:p>
              </text:list-item>
              <text:list-item>
                <text:p text:style-name="P5">Saul</text:p>
              </text:list-item>
              <text:list-item>
                <text:p text:style-name="P5">Shimei</text:p>
              </text:list-item>
              <text:list-item>
                <text:p text:style-name="P5">Jair</text:p>
              </text:list-item>
              <text:list-item>
                <text:p text:style-name="P5">Mordecai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3T19:01:47.928505537</meta:creation-date>
    <dc:date>2026-07-11T12:19:41.679117802</dc:date>
    <meta:editing-duration>PT4H9M12S</meta:editing-duration>
    <meta:editing-cycles>61</meta:editing-cycles>
    <meta:generator>LibreOffice/26.2.4.2$Linux_X86_64 LibreOffice_project/64a984c51f4702dbd3710b13428c673a2f1292e7</meta:generator>
    <dc:title>Shimei the Benjamite</dc:title>
    <meta:document-statistic meta:table-count="1" meta:image-count="0" meta:object-count="0" meta:page-count="1" meta:paragraph-count="52" meta:word-count="318" meta:character-count="1530" meta:non-whitespace-character-count="1307"/>
  </office:meta>
</office:document-meta>
</file>