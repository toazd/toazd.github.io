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800000059F80CBAC7.png" manifest:media-type="image/png"/>
  <manifest:file-entry manifest:full-path="Pictures/10000001000001B90000008F17446E0E.png" manifest:media-type="image/png"/>
  <manifest:file-entry manifest:full-path="Pictures/10000001000001B00000002E952FAEF0.png" manifest:media-type="image/png"/>
  <manifest:file-entry manifest:full-path="Pictures/100000010000025700000085131BF35A.png" manifest:media-type="image/png"/>
  <manifest:file-entry manifest:full-path="Pictures/1000000100000220000001030F103BA8.png" manifest:media-type="image/png"/>
  <manifest:file-entry manifest:full-path="Pictures/1000000100000236000000A989C74D79.png" manifest:media-type="image/png"/>
  <manifest:file-entry manifest:full-path="Pictures/10000001000002A100000074D348DFDF.png" manifest:media-type="image/png"/>
  <manifest:file-entry manifest:full-path="Pictures/10000001000001DC00000035A533AD63.png" manifest:media-type="image/png"/>
  <manifest:file-entry manifest:full-path="Pictures/10000001000001B5000000616993DC1A.png" manifest:media-type="image/png"/>
  <manifest:file-entry manifest:full-path="Pictures/10000001000001E1000000589875A2D9.png" manifest:media-type="image/png"/>
  <manifest:file-entry manifest:full-path="Pictures/10000001000002050000008EEB47175C.png" manifest:media-type="image/png"/>
  <manifest:file-entry manifest:full-path="Pictures/10000001000001AE000000719E2E2CA8.png" manifest:media-type="image/png"/>
  <manifest:file-entry manifest:full-path="Pictures/100000010000020A00000062DC5EE227.png" manifest:media-type="image/png"/>
  <manifest:file-entry manifest:full-path="Pictures/10000001000001C9000001496F940DE9.png" manifest:media-type="image/png"/>
  <manifest:file-entry manifest:full-path="Pictures/100000010000021F000000D495315DAD.png" manifest:media-type="image/png"/>
  <manifest:file-entry manifest:full-path="Pictures/10000001000001D30000003B4DDFF5EC.png" manifest:media-type="image/png"/>
  <manifest:file-entry manifest:full-path="Pictures/100000010000022D00000051A1F8737D.png" manifest:media-type="image/png"/>
  <manifest:file-entry manifest:full-path="Pictures/10000001000001B40000004D9F226989.png" manifest:media-type="image/png"/>
  <manifest:file-entry manifest:full-path="Pictures/10000001000001F0000000A01F494E8B.png" manifest:media-type="image/png"/>
  <manifest:file-entry manifest:full-path="Pictures/100000010000022A000000D7E9BF5A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4in" table:align="margins"/>
    </style:style>
    <style:style style:name="Table2.A" style:family="table-column">
      <style:table-column-properties style:column-width="1.9361in" style:rel-column-width="11130*"/>
    </style:style>
    <style:style style:name="Table2.B" style:family="table-column">
      <style:table-column-properties style:column-width="3.7125in" style:rel-column-width="21341*"/>
    </style:style>
    <style:style style:name="Table2.C" style:family="table-column">
      <style:table-column-properties style:column-width="5.7514in" style:rel-column-width="33064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A2" style:family="table-cell">
      <style:table-cell-properties style:vertical-align="" fo:padding="0.0382in" fo:border-left="0.75pt solid #000000" fo:border-right="none" fo:border-top="none" fo:border-bottom="0.75pt solid #000000"/>
    </style:style>
    <style:style style:name="Table2.C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2.14" style:family="table-row">
      <style:table-row-properties style:min-row-height="0.8181in"/>
    </style:style>
    <style:style style:name="Table1" style:family="table">
      <style:table-properties style:width="11.4in" table:align="margins"/>
    </style:style>
    <style:style style:name="Table1.A" style:family="table-column">
      <style:table-column-properties style:column-width="5.3813in" style:rel-column-width="30935*"/>
    </style:style>
    <style:style style:name="Table1.B" style:family="table-column">
      <style:table-column-properties style:column-width="6.0188in" style:rel-column-width="34600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3" style:family="table">
      <style:table-properties style:width="11.4in" table:align="margins"/>
    </style:style>
    <style:style style:name="Table3.A" style:family="table-column">
      <style:table-column-properties style:column-width="1.0694in" style:rel-column-width="6147*"/>
    </style:style>
    <style:style style:name="Table3.B" style:family="table-column">
      <style:table-column-properties style:column-width="3.3125in" style:rel-column-width="19044*"/>
    </style:style>
    <style:style style:name="Table3.C" style:family="table-column">
      <style:table-column-properties style:column-width="3.0694in" style:rel-column-width="17644*"/>
    </style:style>
    <style:style style:name="Table3.D" style:family="table-column">
      <style:table-column-properties style:column-width="1.7292in" style:rel-column-width="9939*"/>
    </style:style>
    <style:style style:name="Table3.E" style:family="table-column">
      <style:table-column-properties style:column-width="2.2201in" style:rel-column-width="12761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5e14b8" officeooo:paragraph-rsid="005e14b8"/>
    </style:style>
    <style:style style:name="P2" style:family="paragraph" style:parent-style-name="Text_20_body">
      <style:text-properties officeooo:paragraph-rsid="00f30aa6"/>
    </style:style>
    <style:style style:name="P3" style:family="paragraph" style:parent-style-name="Text_20_body">
      <style:text-properties officeooo:rsid="00180b64" officeooo:paragraph-rsid="00180b64"/>
    </style:style>
    <style:style style:name="P4" style:family="paragraph" style:parent-style-name="Text_20_body">
      <style:text-properties officeooo:rsid="00280d45" officeooo:paragraph-rsid="00347bcd"/>
    </style:style>
    <style:style style:name="P5" style:family="paragraph" style:parent-style-name="Text_20_body">
      <style:text-properties style:font-name="Liberation Sans1" officeooo:rsid="00321b45" officeooo:paragraph-rsid="00347bcd"/>
    </style:style>
    <style:style style:name="P6" style:family="paragraph" style:parent-style-name="Text_20_body">
      <style:text-properties style:font-name="Liberation Sans1" officeooo:rsid="003eaad1" officeooo:paragraph-rsid="003eaad1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weight="bold" officeooo:rsid="003eaad1" officeooo:paragraph-rsid="003eaad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weight="bold" officeooo:rsid="00437341" officeooo:paragraph-rsid="00437341" style:font-weight-asian="bold" style:font-weight-complex="bold"/>
    </style:style>
    <style:style style:name="P9" style:family="paragraph" style:parent-style-name="Table_20_Contents">
      <style:paragraph-properties fo:text-align="left" style:justify-single-word="false"/>
      <style:text-properties style:font-name="Liberation Mono" officeooo:rsid="003eaad1" officeooo:paragraph-rsid="003eaad1"/>
    </style:style>
    <style:style style:name="P10" style:family="paragraph" style:parent-style-name="Table_20_Contents">
      <style:text-properties style:font-name="Liberation Mono" officeooo:rsid="00437341" officeooo:paragraph-rsid="00437341"/>
    </style:style>
    <style:style style:name="P11" style:family="paragraph" style:parent-style-name="Table_20_Contents">
      <style:paragraph-properties fo:text-align="left" style:justify-single-word="false"/>
      <style:text-properties style:font-name="Liberation Mono"/>
    </style:style>
    <style:style style:name="P12" style:family="paragraph" style:parent-style-name="Table_20_Contents">
      <style:text-properties style:font-name="Liberation Mono" officeooo:rsid="00468af7" officeooo:paragraph-rsid="00468af7"/>
    </style:style>
    <style:style style:name="P13" style:family="paragraph" style:parent-style-name="Table_20_Contents">
      <style:text-properties style:font-name="Liberation Mono" officeooo:rsid="012fcbad" officeooo:paragraph-rsid="012fcbad"/>
    </style:style>
    <style:style style:name="P14" style:family="paragraph" style:parent-style-name="Table_20_Contents" style:list-style-name="L1">
      <style:text-properties style:font-name="Liberation Mono" officeooo:rsid="012fcbad" officeooo:paragraph-rsid="012fcbad"/>
    </style:style>
    <style:style style:name="P15" style:family="paragraph" style:parent-style-name="Table_20_Contents">
      <style:paragraph-properties fo:text-align="left" style:justify-single-word="false"/>
      <style:text-properties style:font-name="Liberation Mono" officeooo:rsid="0042849b" officeooo:paragraph-rsid="0042849b"/>
    </style:style>
    <style:style style:name="P16" style:family="paragraph" style:parent-style-name="Table_20_Contents">
      <style:paragraph-properties fo:text-align="left" style:justify-single-word="false"/>
      <style:text-properties style:font-name="Liberation Mono" officeooo:paragraph-rsid="0053c608"/>
    </style:style>
    <style:style style:name="P17" style:family="paragraph" style:parent-style-name="Table_20_Contents" style:list-style-name="L2">
      <style:text-properties style:font-name="Liberation Mono" officeooo:rsid="0047975f" officeooo:paragraph-rsid="0047975f"/>
    </style:style>
    <style:style style:name="P18" style:family="paragraph" style:parent-style-name="Table_20_Contents" style:list-style-name="L2">
      <style:text-properties style:font-name="Liberation Mono" officeooo:rsid="004855f6" officeooo:paragraph-rsid="004855f6"/>
    </style:style>
    <style:style style:name="P19" style:family="paragraph" style:parent-style-name="Table_20_Contents" style:list-style-name="L2">
      <style:text-properties style:font-name="Liberation Mono" officeooo:rsid="00495963" officeooo:paragraph-rsid="00495963"/>
    </style:style>
    <style:style style:name="P20" style:family="paragraph" style:parent-style-name="Table_20_Contents" style:list-style-name="L2">
      <style:text-properties style:font-name="Liberation Mono" officeooo:rsid="004b2492" officeooo:paragraph-rsid="004b2492"/>
    </style:style>
    <style:style style:name="P21" style:family="paragraph" style:parent-style-name="Table_20_Contents" style:list-style-name="L2">
      <style:text-properties style:font-name="Liberation Mono" officeooo:rsid="0077365b" officeooo:paragraph-rsid="0077365b"/>
    </style:style>
    <style:style style:name="P22" style:family="paragraph" style:parent-style-name="Table_20_Contents">
      <style:paragraph-properties fo:text-align="left" style:justify-single-word="false"/>
      <style:text-properties style:font-name="Liberation Mono" officeooo:rsid="0042849b" officeooo:paragraph-rsid="0053c608"/>
    </style:style>
    <style:style style:name="P23" style:family="paragraph" style:parent-style-name="Table_20_Contents" style:list-style-name="L3">
      <style:text-properties style:font-name="Liberation Mono" officeooo:rsid="0054a353" officeooo:paragraph-rsid="0054a353"/>
    </style:style>
    <style:style style:name="P24" style:family="paragraph" style:parent-style-name="Table_20_Contents" style:list-style-name="L3">
      <style:text-properties style:font-name="Liberation Mono" officeooo:rsid="005903b5" officeooo:paragraph-rsid="005903b5"/>
    </style:style>
    <style:style style:name="P25" style:family="paragraph" style:parent-style-name="Table_20_Contents" style:list-style-name="L3">
      <style:text-properties style:font-name="Liberation Mono" officeooo:rsid="005ad167" officeooo:paragraph-rsid="005ad167"/>
    </style:style>
    <style:style style:name="P26" style:family="paragraph" style:parent-style-name="Table_20_Contents" style:list-style-name="L3">
      <style:text-properties style:font-name="Liberation Mono" officeooo:rsid="005dc8c6" officeooo:paragraph-rsid="005dc8c6"/>
    </style:style>
    <style:style style:name="P27" style:family="paragraph" style:parent-style-name="Table_20_Contents" style:list-style-name="L3">
      <style:text-properties style:font-name="Liberation Mono" officeooo:rsid="005e2e6c" officeooo:paragraph-rsid="005e2e6c"/>
    </style:style>
    <style:style style:name="P28" style:family="paragraph" style:parent-style-name="Table_20_Contents" style:list-style-name="L3">
      <style:text-properties style:font-name="Liberation Mono" officeooo:rsid="005f6c44" officeooo:paragraph-rsid="005f6c44"/>
    </style:style>
    <style:style style:name="P29" style:family="paragraph" style:parent-style-name="Table_20_Contents">
      <style:paragraph-properties fo:text-align="left" style:justify-single-word="false"/>
      <style:text-properties style:font-name="Liberation Mono" officeooo:rsid="0060fca4" officeooo:paragraph-rsid="0060fca4"/>
    </style:style>
    <style:style style:name="P30" style:family="paragraph" style:parent-style-name="Table_20_Contents" style:list-style-name="L3">
      <style:text-properties style:font-name="Liberation Mono" officeooo:rsid="0061be77" officeooo:paragraph-rsid="0061be77"/>
    </style:style>
    <style:style style:name="P31" style:family="paragraph" style:parent-style-name="Table_20_Contents" style:list-style-name="L3">
      <style:text-properties style:font-name="Liberation Mono" officeooo:rsid="006396e4" officeooo:paragraph-rsid="00880b8d"/>
    </style:style>
    <style:style style:name="P32" style:family="paragraph" style:parent-style-name="Table_20_Contents" style:list-style-name="L3">
      <style:text-properties style:font-name="Liberation Mono" officeooo:rsid="0064641b" officeooo:paragraph-rsid="00880b8d"/>
    </style:style>
    <style:style style:name="P33" style:family="paragraph" style:parent-style-name="Table_20_Contents" style:list-style-name="L3">
      <style:text-properties style:font-name="Liberation Mono" officeooo:rsid="006612e4" officeooo:paragraph-rsid="00880b8d"/>
    </style:style>
    <style:style style:name="P34" style:family="paragraph" style:parent-style-name="Table_20_Contents" style:list-style-name="L3">
      <style:text-properties style:font-name="Liberation Mono" officeooo:rsid="0067c4e9" officeooo:paragraph-rsid="00880b8d"/>
    </style:style>
    <style:style style:name="P35" style:family="paragraph" style:parent-style-name="Table_20_Contents" style:list-style-name="L3">
      <style:text-properties style:font-name="Liberation Mono" officeooo:rsid="006a7403" officeooo:paragraph-rsid="00880b8d"/>
    </style:style>
    <style:style style:name="P36" style:family="paragraph" style:parent-style-name="Table_20_Contents" style:list-style-name="L3">
      <style:text-properties style:font-name="Liberation Mono" officeooo:rsid="006b1fac" officeooo:paragraph-rsid="00880b8d"/>
    </style:style>
    <style:style style:name="P37" style:family="paragraph" style:parent-style-name="Table_20_Contents" style:list-style-name="L3">
      <style:text-properties style:font-name="Liberation Mono" officeooo:rsid="006b4680" officeooo:paragraph-rsid="00880b8d"/>
    </style:style>
    <style:style style:name="P38" style:family="paragraph" style:parent-style-name="Table_20_Contents" style:list-style-name="L3">
      <style:text-properties style:font-name="Liberation Mono" officeooo:rsid="006de327" officeooo:paragraph-rsid="00880b8d"/>
    </style:style>
    <style:style style:name="P39" style:family="paragraph" style:parent-style-name="Table_20_Contents" style:list-style-name="L3">
      <style:text-properties style:font-name="Liberation Mono" officeooo:rsid="006f9d5d" officeooo:paragraph-rsid="00880b8d"/>
    </style:style>
    <style:style style:name="P40" style:family="paragraph" style:parent-style-name="Table_20_Contents" style:list-style-name="L3">
      <style:text-properties style:font-name="Liberation Mono" officeooo:rsid="006fcfc2" officeooo:paragraph-rsid="00880b8d"/>
    </style:style>
    <style:style style:name="P41" style:family="paragraph" style:parent-style-name="Table_20_Contents" style:list-style-name="L3">
      <style:text-properties style:font-name="Liberation Mono" officeooo:rsid="006ffa54" officeooo:paragraph-rsid="00880b8d"/>
    </style:style>
    <style:style style:name="P42" style:family="paragraph" style:parent-style-name="Table_20_Contents" style:list-style-name="L3">
      <style:text-properties style:font-name="Liberation Mono" officeooo:rsid="0071e1b4" officeooo:paragraph-rsid="00880b8d"/>
    </style:style>
    <style:style style:name="P43" style:family="paragraph" style:parent-style-name="Table_20_Contents" style:list-style-name="L3">
      <style:text-properties style:font-name="Liberation Mono" officeooo:rsid="0073efa2" officeooo:paragraph-rsid="00880b8d"/>
    </style:style>
    <style:style style:name="P44" style:family="paragraph" style:parent-style-name="Table_20_Contents">
      <style:paragraph-properties fo:text-align="left" style:justify-single-word="false"/>
      <style:text-properties style:font-name="Liberation Mono" officeooo:rsid="007bbab5" officeooo:paragraph-rsid="007bbab5"/>
    </style:style>
    <style:style style:name="P45" style:family="paragraph" style:parent-style-name="Table_20_Contents" style:list-style-name="L3">
      <style:text-properties style:font-name="Liberation Mono" officeooo:rsid="007ea5c1" officeooo:paragraph-rsid="007ea5c1"/>
    </style:style>
    <style:style style:name="P46" style:family="paragraph" style:parent-style-name="Table_20_Contents" style:list-style-name="L3">
      <style:text-properties style:font-name="Liberation Mono" officeooo:rsid="009c3c3c" officeooo:paragraph-rsid="009c3c3c"/>
    </style:style>
    <style:style style:name="P47" style:family="paragraph" style:parent-style-name="Table_20_Contents" style:list-style-name="L3">
      <style:text-properties style:font-name="Liberation Mono" officeooo:rsid="00a00674" officeooo:paragraph-rsid="00a00674"/>
    </style:style>
    <style:style style:name="P48" style:family="paragraph" style:parent-style-name="Table_20_Contents" style:list-style-name="L3">
      <style:text-properties style:font-name="Liberation Mono" officeooo:rsid="00b31ffb" officeooo:paragraph-rsid="00b31ffb"/>
    </style:style>
    <style:style style:name="P49" style:family="paragraph" style:parent-style-name="Table_20_Contents" style:list-style-name="L3">
      <style:text-properties style:font-name="Liberation Mono" officeooo:rsid="009310b6" officeooo:paragraph-rsid="009310b6"/>
    </style:style>
    <style:style style:name="P50" style:family="paragraph" style:parent-style-name="Table_20_Contents" style:list-style-name="L3">
      <style:text-properties style:font-name="Liberation Mono" officeooo:rsid="009f5809" officeooo:paragraph-rsid="009f5809"/>
    </style:style>
    <style:style style:name="P51" style:family="paragraph" style:parent-style-name="Table_20_Contents" style:list-style-name="L3">
      <style:text-properties style:font-name="Liberation Mono" officeooo:rsid="009a09b6" officeooo:paragraph-rsid="009a09b6"/>
    </style:style>
    <style:style style:name="P52" style:family="paragraph" style:parent-style-name="Table_20_Contents" style:list-style-name="L3">
      <style:text-properties style:font-name="Liberation Mono" officeooo:rsid="009bcc07" officeooo:paragraph-rsid="009bcc07"/>
    </style:style>
    <style:style style:name="P53" style:family="paragraph" style:parent-style-name="Table_20_Contents" style:list-style-name="L3">
      <style:text-properties style:font-name="Liberation Mono" officeooo:rsid="00944c93" officeooo:paragraph-rsid="00944c93"/>
    </style:style>
    <style:style style:name="P54" style:family="paragraph" style:parent-style-name="Table_20_Contents" style:list-style-name="L3">
      <style:text-properties style:font-name="Liberation Mono" officeooo:rsid="00a27711" officeooo:paragraph-rsid="00a27711"/>
    </style:style>
    <style:style style:name="P55" style:family="paragraph" style:parent-style-name="Table_20_Contents" style:list-style-name="L3">
      <style:text-properties style:font-name="Liberation Mono" officeooo:rsid="00a2c1b7" officeooo:paragraph-rsid="00a2c1b7"/>
    </style:style>
    <style:style style:name="P56" style:family="paragraph" style:parent-style-name="Table_20_Contents" style:list-style-name="L3">
      <style:text-properties style:font-name="Liberation Mono" officeooo:rsid="00a540a3" officeooo:paragraph-rsid="00a540a3"/>
    </style:style>
    <style:style style:name="P57" style:family="paragraph" style:parent-style-name="Table_20_Contents" style:list-style-name="L3">
      <style:text-properties style:font-name="Liberation Mono" officeooo:rsid="00a333f9" officeooo:paragraph-rsid="00a333f9"/>
    </style:style>
    <style:style style:name="P58" style:family="paragraph" style:parent-style-name="Table_20_Contents" style:list-style-name="L3">
      <style:text-properties style:font-name="Liberation Mono" officeooo:rsid="00a27711" officeooo:paragraph-rsid="00a333f9"/>
    </style:style>
    <style:style style:name="P59" style:family="paragraph" style:parent-style-name="Table_20_Contents" style:list-style-name="L3">
      <style:text-properties style:font-name="Liberation Mono" officeooo:rsid="00a3f55f" officeooo:paragraph-rsid="00a3f55f"/>
    </style:style>
    <style:style style:name="P60" style:family="paragraph" style:parent-style-name="Table_20_Contents" style:list-style-name="L3">
      <style:text-properties style:font-name="Liberation Mono" officeooo:rsid="00a5227e" officeooo:paragraph-rsid="00a5227e"/>
    </style:style>
    <style:style style:name="P61" style:family="paragraph" style:parent-style-name="Table_20_Contents" style:list-style-name="L3">
      <style:text-properties style:font-name="Liberation Mono" officeooo:rsid="00a6b828" officeooo:paragraph-rsid="00a6b828"/>
    </style:style>
    <style:style style:name="P62" style:family="paragraph" style:parent-style-name="Table_20_Contents" style:list-style-name="L3">
      <style:text-properties style:font-name="Liberation Mono" officeooo:rsid="00a792c4" officeooo:paragraph-rsid="00a792c4"/>
    </style:style>
    <style:style style:name="P63" style:family="paragraph" style:parent-style-name="Table_20_Contents" style:list-style-name="L3">
      <style:text-properties style:font-name="Liberation Mono" officeooo:rsid="00a8f9c7" officeooo:paragraph-rsid="00a8f9c7"/>
    </style:style>
    <style:style style:name="P64" style:family="paragraph" style:parent-style-name="Table_20_Contents" style:list-style-name="L3">
      <style:text-properties style:font-name="Liberation Mono" officeooo:rsid="00aa09e2" officeooo:paragraph-rsid="00aa09e2"/>
    </style:style>
    <style:style style:name="P65" style:family="paragraph" style:parent-style-name="Table_20_Contents" style:list-style-name="L3">
      <style:text-properties style:font-name="Liberation Mono" officeooo:rsid="00aa09e2" officeooo:paragraph-rsid="01924917"/>
    </style:style>
    <style:style style:name="P66" style:family="paragraph" style:parent-style-name="Table_20_Contents" style:list-style-name="L3">
      <style:text-properties style:font-name="Liberation Mono" officeooo:rsid="00ab6496" officeooo:paragraph-rsid="00ab6496"/>
    </style:style>
    <style:style style:name="P67" style:family="paragraph" style:parent-style-name="Table_20_Contents" style:list-style-name="L3">
      <style:text-properties style:font-name="Liberation Mono" officeooo:rsid="00ac8415" officeooo:paragraph-rsid="00ac8415"/>
    </style:style>
    <style:style style:name="P68" style:family="paragraph" style:parent-style-name="Table_20_Contents" style:list-style-name="L3">
      <style:text-properties style:font-name="Liberation Mono" officeooo:rsid="00ac9174" officeooo:paragraph-rsid="00ac9174"/>
    </style:style>
    <style:style style:name="P69" style:family="paragraph" style:parent-style-name="Table_20_Contents" style:list-style-name="L3">
      <style:text-properties style:font-name="Liberation Mono" officeooo:rsid="00ad2f76" officeooo:paragraph-rsid="00ad2f76"/>
    </style:style>
    <style:style style:name="P70" style:family="paragraph" style:parent-style-name="Table_20_Contents" style:list-style-name="L3">
      <style:text-properties style:font-name="Liberation Mono" officeooo:rsid="00afcdaa" officeooo:paragraph-rsid="00afcdaa"/>
    </style:style>
    <style:style style:name="P71" style:family="paragraph" style:parent-style-name="Table_20_Contents" style:list-style-name="L3">
      <style:text-properties style:font-name="Liberation Mono" officeooo:rsid="00b24792" officeooo:paragraph-rsid="00b24792"/>
    </style:style>
    <style:style style:name="P72" style:family="paragraph" style:parent-style-name="Table_20_Contents" style:list-style-name="L3">
      <style:text-properties style:font-name="Liberation Mono" officeooo:rsid="00b2ebf7" officeooo:paragraph-rsid="00b2ebf7"/>
    </style:style>
    <style:style style:name="P73" style:family="paragraph" style:parent-style-name="Table_20_Contents" style:list-style-name="L3">
      <style:text-properties style:font-name="Liberation Mono" officeooo:rsid="00b366ab" officeooo:paragraph-rsid="00b366ab"/>
    </style:style>
    <style:style style:name="P74" style:family="paragraph" style:parent-style-name="Table_20_Contents" style:list-style-name="L3">
      <style:text-properties style:font-name="Liberation Mono" officeooo:rsid="00b3b29f" officeooo:paragraph-rsid="00b3b29f"/>
    </style:style>
    <style:style style:name="P75" style:family="paragraph" style:parent-style-name="Table_20_Contents" style:list-style-name="L3">
      <style:text-properties style:font-name="Liberation Mono" officeooo:rsid="00b542f1" officeooo:paragraph-rsid="00b542f1"/>
    </style:style>
    <style:style style:name="P76" style:family="paragraph" style:parent-style-name="Table_20_Contents" style:list-style-name="L3">
      <style:text-properties style:font-name="Liberation Mono" officeooo:rsid="00b3b29f" officeooo:paragraph-rsid="00b542f1"/>
    </style:style>
    <style:style style:name="P77" style:family="paragraph" style:parent-style-name="Table_20_Contents" style:list-style-name="L3">
      <style:text-properties style:font-name="Liberation Mono" officeooo:rsid="00b73eee" officeooo:paragraph-rsid="00b73eee"/>
    </style:style>
    <style:style style:name="P78" style:family="paragraph" style:parent-style-name="Table_20_Contents" style:list-style-name="L3">
      <style:text-properties style:font-name="Liberation Mono" officeooo:rsid="00b8e401" officeooo:paragraph-rsid="00b8e401"/>
    </style:style>
    <style:style style:name="P79" style:family="paragraph" style:parent-style-name="Table_20_Contents" style:list-style-name="L3">
      <style:text-properties style:font-name="Liberation Mono" officeooo:rsid="00bc4a69" officeooo:paragraph-rsid="00bc4a69"/>
    </style:style>
    <style:style style:name="P80" style:family="paragraph" style:parent-style-name="Table_20_Contents" style:list-style-name="L3">
      <style:text-properties style:font-name="Liberation Mono" officeooo:rsid="018d271f" officeooo:paragraph-rsid="018d271f"/>
    </style:style>
    <style:style style:name="P81" style:family="paragraph" style:parent-style-name="Table_20_Contents">
      <style:paragraph-properties fo:text-align="left" style:justify-single-word="false"/>
      <style:text-properties style:font-name="Liberation Mono" officeooo:rsid="00bcfe0e" officeooo:paragraph-rsid="00bcfe0e"/>
    </style:style>
    <style:style style:name="P82" style:family="paragraph" style:parent-style-name="Table_20_Contents" style:list-style-name="L3">
      <style:text-properties style:font-name="Liberation Mono" officeooo:rsid="00bf004f" officeooo:paragraph-rsid="00bf004f"/>
    </style:style>
    <style:style style:name="P83" style:family="paragraph" style:parent-style-name="Table_20_Contents" style:list-style-name="L3">
      <style:text-properties style:font-name="Liberation Mono" officeooo:rsid="00c0d53e" officeooo:paragraph-rsid="00c0d53e"/>
    </style:style>
    <style:style style:name="P84" style:family="paragraph" style:parent-style-name="Table_20_Contents" style:list-style-name="L3">
      <style:text-properties style:font-name="Liberation Mono" officeooo:rsid="00c23bd6" officeooo:paragraph-rsid="00c23bd6"/>
    </style:style>
    <style:style style:name="P85" style:family="paragraph" style:parent-style-name="Table_20_Contents" style:list-style-name="L3">
      <style:text-properties style:font-name="Liberation Mono" officeooo:rsid="00c26504" officeooo:paragraph-rsid="00c26504"/>
    </style:style>
    <style:style style:name="P86" style:family="paragraph" style:parent-style-name="Table_20_Contents">
      <style:paragraph-properties fo:text-align="left" style:justify-single-word="false"/>
      <style:text-properties style:font-name="Liberation Mono" officeooo:rsid="00c53e5e" officeooo:paragraph-rsid="00c53e5e"/>
    </style:style>
    <style:style style:name="P87" style:family="paragraph" style:parent-style-name="Table_20_Contents">
      <style:paragraph-properties fo:text-align="left" style:justify-single-word="false"/>
      <style:text-properties style:font-name="Liberation Mono" officeooo:paragraph-rsid="00c61984"/>
    </style:style>
    <style:style style:name="P88" style:family="paragraph" style:parent-style-name="Table_20_Contents" style:list-style-name="L3">
      <style:text-properties style:font-name="Liberation Mono" officeooo:rsid="00c91aae" officeooo:paragraph-rsid="00c91aae"/>
    </style:style>
    <style:style style:name="P89" style:family="paragraph" style:parent-style-name="Table_20_Contents" style:list-style-name="L3">
      <style:text-properties style:font-name="Liberation Mono" officeooo:rsid="00c6af39" officeooo:paragraph-rsid="00c6af39"/>
    </style:style>
    <style:style style:name="P90" style:family="paragraph" style:parent-style-name="Table_20_Contents" style:list-style-name="L3">
      <style:text-properties style:font-name="Liberation Mono" officeooo:rsid="00cafe13" officeooo:paragraph-rsid="00cafe13"/>
    </style:style>
    <style:style style:name="P91" style:family="paragraph" style:parent-style-name="Table_20_Contents" style:list-style-name="L3">
      <style:text-properties style:font-name="Liberation Mono" officeooo:rsid="00cc2399" officeooo:paragraph-rsid="00cc2399"/>
    </style:style>
    <style:style style:name="P92" style:family="paragraph" style:parent-style-name="Table_20_Contents" style:list-style-name="L3">
      <style:text-properties style:font-name="Liberation Mono" officeooo:rsid="00ce21cf" officeooo:paragraph-rsid="00ce21cf"/>
    </style:style>
    <style:style style:name="P93" style:family="paragraph" style:parent-style-name="Table_20_Contents" style:list-style-name="L3">
      <style:text-properties style:font-name="Liberation Mono" officeooo:rsid="00ce761f" officeooo:paragraph-rsid="00ce761f"/>
    </style:style>
    <style:style style:name="P94" style:family="paragraph" style:parent-style-name="Table_20_Contents" style:list-style-name="L3">
      <style:text-properties style:font-name="Liberation Mono" officeooo:rsid="00d205be" officeooo:paragraph-rsid="00d205be"/>
    </style:style>
    <style:style style:name="P95" style:family="paragraph" style:parent-style-name="Table_20_Contents" style:list-style-name="L3">
      <style:text-properties style:font-name="Liberation Mono" officeooo:rsid="00d40dc5" officeooo:paragraph-rsid="00d40dc5"/>
    </style:style>
    <style:style style:name="P96" style:family="paragraph" style:parent-style-name="Table_20_Contents" style:list-style-name="L3">
      <style:text-properties style:font-name="Liberation Mono" officeooo:rsid="00d64907" officeooo:paragraph-rsid="00d64907"/>
    </style:style>
    <style:style style:name="P97" style:family="paragraph" style:parent-style-name="Table_20_Contents" style:list-style-name="L3">
      <style:text-properties style:font-name="Liberation Mono" officeooo:rsid="00d955ca" officeooo:paragraph-rsid="00d955ca"/>
    </style:style>
    <style:style style:name="P98" style:family="paragraph" style:parent-style-name="Table_20_Contents" style:list-style-name="L3">
      <style:text-properties style:font-name="Liberation Mono" officeooo:rsid="00dafe65" officeooo:paragraph-rsid="00dafe65"/>
    </style:style>
    <style:style style:name="P99" style:family="paragraph" style:parent-style-name="Table_20_Contents" style:list-style-name="L3">
      <style:text-properties style:font-name="Liberation Mono" officeooo:rsid="00db7f1c" officeooo:paragraph-rsid="00db7f1c"/>
    </style:style>
    <style:style style:name="P100" style:family="paragraph" style:parent-style-name="Table_20_Contents" style:list-style-name="L3">
      <style:text-properties style:font-name="Liberation Mono" officeooo:rsid="00d955ca" officeooo:paragraph-rsid="00db7f1c"/>
    </style:style>
    <style:style style:name="P101" style:family="paragraph" style:parent-style-name="Table_20_Contents" style:list-style-name="L3">
      <style:text-properties style:font-name="Liberation Mono" officeooo:rsid="00dc96c0" officeooo:paragraph-rsid="00dc96c0"/>
    </style:style>
    <style:style style:name="P102" style:family="paragraph" style:parent-style-name="Table_20_Contents" style:list-style-name="L3">
      <style:text-properties style:font-name="Liberation Mono" officeooo:rsid="00de8a8e" officeooo:paragraph-rsid="00de8a8e"/>
    </style:style>
    <style:style style:name="P103" style:family="paragraph" style:parent-style-name="Table_20_Contents" style:list-style-name="L3">
      <style:text-properties style:font-name="Liberation Mono" officeooo:rsid="00e01da7" officeooo:paragraph-rsid="00e01da7"/>
    </style:style>
    <style:style style:name="P104" style:family="paragraph" style:parent-style-name="Table_20_Contents" style:list-style-name="L3">
      <style:text-properties style:font-name="Liberation Mono" officeooo:rsid="00e1f850" officeooo:paragraph-rsid="00e1f850"/>
    </style:style>
    <style:style style:name="P105" style:family="paragraph" style:parent-style-name="Table_20_Contents">
      <style:paragraph-properties fo:text-align="left" style:justify-single-word="false"/>
      <style:text-properties style:font-name="Liberation Mono" officeooo:rsid="00e360be" officeooo:paragraph-rsid="00e360be"/>
    </style:style>
    <style:style style:name="P106" style:family="paragraph" style:parent-style-name="Table_20_Contents" style:list-style-name="L3">
      <style:text-properties style:font-name="Liberation Mono" officeooo:rsid="00e5032c" officeooo:paragraph-rsid="00e5032c"/>
    </style:style>
    <style:style style:name="P107" style:family="paragraph" style:parent-style-name="Table_20_Contents">
      <style:paragraph-properties fo:text-align="left" style:justify-single-word="false"/>
      <style:text-properties style:font-name="Liberation Mono" officeooo:rsid="00e70f05" officeooo:paragraph-rsid="00e70f05"/>
    </style:style>
    <style:style style:name="P108" style:family="paragraph" style:parent-style-name="Table_20_Contents">
      <style:paragraph-properties fo:text-align="left" style:justify-single-word="false"/>
      <style:text-properties style:font-name="Liberation Mono" officeooo:rsid="00e56b96" officeooo:paragraph-rsid="00e56b96"/>
    </style:style>
    <style:style style:name="P109" style:family="paragraph" style:parent-style-name="Table_20_Contents" style:list-style-name="L3">
      <style:text-properties style:font-name="Liberation Mono" officeooo:rsid="00e83333" officeooo:paragraph-rsid="00e83333"/>
    </style:style>
    <style:style style:name="P110" style:family="paragraph" style:parent-style-name="Table_20_Contents" style:list-style-name="L3">
      <style:text-properties style:font-name="Liberation Mono" officeooo:rsid="00e9821b" officeooo:paragraph-rsid="00e9821b"/>
    </style:style>
    <style:style style:name="P111" style:family="paragraph" style:parent-style-name="Table_20_Contents" style:list-style-name="L3">
      <style:text-properties style:font-name="Liberation Mono" officeooo:rsid="00ea1184" officeooo:paragraph-rsid="00ea1184"/>
    </style:style>
    <style:style style:name="P112" style:family="paragraph" style:parent-style-name="Table_20_Contents" style:list-style-name="L3">
      <style:text-properties style:font-name="Liberation Mono" officeooo:rsid="00eca4d6" officeooo:paragraph-rsid="00eca4d6"/>
    </style:style>
    <style:style style:name="P113" style:family="paragraph" style:parent-style-name="Table_20_Contents" style:list-style-name="L3">
      <style:text-properties style:font-name="Liberation Mono" officeooo:rsid="00ecc918" officeooo:paragraph-rsid="00ecc918"/>
    </style:style>
    <style:style style:name="P114" style:family="paragraph" style:parent-style-name="Table_20_Contents" style:list-style-name="L3">
      <style:text-properties style:font-name="Liberation Mono" officeooo:rsid="00ecda80" officeooo:paragraph-rsid="00ecda80"/>
    </style:style>
    <style:style style:name="P115" style:family="paragraph" style:parent-style-name="Table_20_Contents" style:list-style-name="L3">
      <style:text-properties style:font-name="Liberation Mono" officeooo:rsid="00ef628c" officeooo:paragraph-rsid="00ef628c"/>
    </style:style>
    <style:style style:name="P116" style:family="paragraph" style:parent-style-name="Table_20_Contents" style:list-style-name="L3">
      <style:text-properties style:font-name="Liberation Mono" officeooo:rsid="00f19a52" officeooo:paragraph-rsid="00f19a52"/>
    </style:style>
    <style:style style:name="P117" style:family="paragraph" style:parent-style-name="Table_20_Contents" style:list-style-name="L3">
      <style:text-properties style:font-name="Liberation Mono" officeooo:rsid="00f1ae3a" officeooo:paragraph-rsid="00f1ae3a"/>
    </style:style>
    <style:style style:name="P118" style:family="paragraph" style:parent-style-name="Table_20_Contents" style:list-style-name="L3">
      <style:text-properties style:font-name="Liberation Mono" officeooo:rsid="00f2886f" officeooo:paragraph-rsid="00f2886f"/>
    </style:style>
    <style:style style:name="P119" style:family="paragraph" style:parent-style-name="Table_20_Contents">
      <style:paragraph-properties fo:text-align="left" style:justify-single-word="false"/>
      <style:text-properties style:font-name="Liberation Mono" officeooo:rsid="0112e3f8" officeooo:paragraph-rsid="0112e3f8"/>
    </style:style>
    <style:style style:name="P120" style:family="paragraph" style:parent-style-name="Table_20_Contents" style:list-style-name="L3">
      <style:text-properties style:font-name="Liberation Mono" officeooo:rsid="0112e3f8" officeooo:paragraph-rsid="0112e3f8"/>
    </style:style>
    <style:style style:name="P121" style:family="paragraph" style:parent-style-name="Table_20_Contents" style:list-style-name="L3">
      <style:text-properties style:font-name="Liberation Mono" officeooo:rsid="0113a53f" officeooo:paragraph-rsid="0113a53f"/>
    </style:style>
    <style:style style:name="P122" style:family="paragraph" style:parent-style-name="Table_20_Contents" style:list-style-name="L3">
      <style:text-properties style:font-name="Liberation Mono" officeooo:rsid="0115392a" officeooo:paragraph-rsid="0115392a"/>
    </style:style>
    <style:style style:name="P123" style:family="paragraph" style:parent-style-name="Table_20_Contents" style:list-style-name="L3">
      <style:text-properties style:font-name="Liberation Mono" officeooo:rsid="01168924" officeooo:paragraph-rsid="01168924"/>
    </style:style>
    <style:style style:name="P124" style:family="paragraph" style:parent-style-name="Table_20_Contents" style:list-style-name="L3">
      <style:text-properties style:font-name="Liberation Mono" officeooo:rsid="01186e7f" officeooo:paragraph-rsid="01186e7f"/>
    </style:style>
    <style:style style:name="P125" style:family="paragraph" style:parent-style-name="Table_20_Contents">
      <style:paragraph-properties fo:text-align="left" style:justify-single-word="false"/>
      <style:text-properties style:font-name="Liberation Mono" officeooo:rsid="01189673" officeooo:paragraph-rsid="01189673"/>
    </style:style>
    <style:style style:name="P126" style:family="paragraph" style:parent-style-name="Table_20_Contents" style:list-style-name="L3">
      <style:text-properties style:font-name="Liberation Mono" officeooo:rsid="01189673" officeooo:paragraph-rsid="01189673"/>
    </style:style>
    <style:style style:name="P127" style:family="paragraph" style:parent-style-name="Table_20_Contents" style:list-style-name="L3">
      <style:text-properties style:font-name="Liberation Mono" officeooo:rsid="011a392f" officeooo:paragraph-rsid="011a392f"/>
    </style:style>
    <style:style style:name="P128" style:family="paragraph" style:parent-style-name="Table_20_Contents" style:list-style-name="L3">
      <style:text-properties style:font-name="Liberation Mono" officeooo:rsid="011a441f" officeooo:paragraph-rsid="011a441f"/>
    </style:style>
    <style:style style:name="P129" style:family="paragraph" style:parent-style-name="Table_20_Contents" style:list-style-name="L3">
      <style:text-properties style:font-name="Liberation Mono" officeooo:rsid="011bd4e0" officeooo:paragraph-rsid="011bd4e0"/>
    </style:style>
    <style:style style:name="P130" style:family="paragraph" style:parent-style-name="Table_20_Contents" style:list-style-name="L3">
      <style:text-properties style:font-name="Liberation Mono" officeooo:rsid="011f7be6" officeooo:paragraph-rsid="011f7be6"/>
    </style:style>
    <style:style style:name="P131" style:family="paragraph" style:parent-style-name="Table_20_Contents">
      <style:paragraph-properties fo:text-align="left" style:justify-single-word="false"/>
      <style:text-properties style:font-name="Liberation Mono" officeooo:rsid="01249764" officeooo:paragraph-rsid="01249764"/>
    </style:style>
    <style:style style:name="P132" style:family="paragraph" style:parent-style-name="Table_20_Contents" style:list-style-name="L3">
      <style:text-properties style:font-name="Liberation Mono" officeooo:rsid="0125a465" officeooo:paragraph-rsid="0125a465"/>
    </style:style>
    <style:style style:name="P133" style:family="paragraph" style:parent-style-name="Table_20_Contents" style:list-style-name="L3">
      <style:text-properties style:font-name="Liberation Mono" officeooo:rsid="0125f71d" officeooo:paragraph-rsid="0125f71d"/>
    </style:style>
    <style:style style:name="P134" style:family="paragraph" style:parent-style-name="Table_20_Contents" style:list-style-name="L3">
      <style:text-properties style:font-name="Liberation Mono" officeooo:rsid="01286947" officeooo:paragraph-rsid="01286947"/>
    </style:style>
    <style:style style:name="P135" style:family="paragraph" style:parent-style-name="Table_20_Contents" style:list-style-name="L3">
      <style:text-properties style:font-name="Liberation Mono" officeooo:rsid="012a48ec" officeooo:paragraph-rsid="012a48ec"/>
    </style:style>
    <style:style style:name="P136" style:family="paragraph" style:parent-style-name="Table_20_Contents" style:list-style-name="L3">
      <style:text-properties style:font-name="Liberation Mono" officeooo:rsid="012b9bc0" officeooo:paragraph-rsid="012b9bc0"/>
    </style:style>
    <style:style style:name="P137" style:family="paragraph" style:parent-style-name="Table_20_Contents" style:list-style-name="L3">
      <style:text-properties style:font-name="Liberation Mono" officeooo:rsid="012ced7b" officeooo:paragraph-rsid="012ced7b"/>
    </style:style>
    <style:style style:name="P138" style:family="paragraph" style:parent-style-name="Table_20_Contents" style:list-style-name="L3">
      <style:text-properties style:font-name="Liberation Mono" officeooo:rsid="012ecc52" officeooo:paragraph-rsid="01319160"/>
    </style:style>
    <style:style style:name="P139" style:family="paragraph" style:parent-style-name="Table_20_Contents" style:list-style-name="L3">
      <style:text-properties style:font-name="Liberation Mono" officeooo:rsid="012ecc52" officeooo:paragraph-rsid="012ecc52"/>
    </style:style>
    <style:style style:name="P140" style:family="paragraph" style:parent-style-name="Table_20_Contents">
      <style:paragraph-properties fo:text-align="left" style:justify-single-word="false"/>
      <style:text-properties style:font-name="Liberation Mono" officeooo:rsid="0139a09f" officeooo:paragraph-rsid="0139a09f"/>
    </style:style>
    <style:style style:name="P141" style:family="paragraph" style:parent-style-name="Table_20_Contents" style:list-style-name="L3">
      <style:text-properties style:font-name="Liberation Mono" officeooo:rsid="013a07dc" officeooo:paragraph-rsid="013a07dc"/>
    </style:style>
    <style:style style:name="P142" style:family="paragraph" style:parent-style-name="Table_20_Contents" style:list-style-name="L3">
      <style:text-properties style:font-name="Liberation Mono" officeooo:rsid="013c2669" officeooo:paragraph-rsid="013c2669"/>
    </style:style>
    <style:style style:name="P143" style:family="paragraph" style:parent-style-name="Table_20_Contents" style:list-style-name="L3">
      <style:text-properties style:font-name="Liberation Mono" officeooo:rsid="013d0369" officeooo:paragraph-rsid="013d0369"/>
    </style:style>
    <style:style style:name="P144" style:family="paragraph" style:parent-style-name="Table_20_Contents">
      <style:paragraph-properties fo:text-align="left" style:justify-single-word="false"/>
      <style:text-properties style:font-name="Liberation Mono" officeooo:rsid="013e6f78" officeooo:paragraph-rsid="013e6f78"/>
    </style:style>
    <style:style style:name="P145" style:family="paragraph" style:parent-style-name="Table_20_Contents">
      <style:paragraph-properties fo:text-align="left" style:justify-single-word="false"/>
      <style:text-properties style:font-name="Liberation Mono" officeooo:rsid="015e5c95" officeooo:paragraph-rsid="015e5c95"/>
    </style:style>
    <style:style style:name="P146" style:family="paragraph" style:parent-style-name="Table_20_Contents" style:list-style-name="L3">
      <style:text-properties style:font-name="Liberation Mono" officeooo:rsid="013ecdbb" officeooo:paragraph-rsid="013ecdbb"/>
    </style:style>
    <style:style style:name="P147" style:family="paragraph" style:parent-style-name="Table_20_Contents" style:list-style-name="L3">
      <style:text-properties style:font-name="Liberation Mono" officeooo:rsid="0140a9b7" officeooo:paragraph-rsid="0140a9b7"/>
    </style:style>
    <style:style style:name="P148" style:family="paragraph" style:parent-style-name="Table_20_Contents" style:list-style-name="L3">
      <style:text-properties style:font-name="Liberation Mono" officeooo:rsid="01418cb5" officeooo:paragraph-rsid="01418cb5"/>
    </style:style>
    <style:style style:name="P149" style:family="paragraph" style:parent-style-name="Table_20_Contents" style:list-style-name="L3">
      <style:text-properties style:font-name="Liberation Mono" officeooo:rsid="0142af9c" officeooo:paragraph-rsid="0142af9c"/>
    </style:style>
    <style:style style:name="P150" style:family="paragraph" style:parent-style-name="Table_20_Contents" style:list-style-name="L3">
      <style:text-properties style:font-name="Liberation Mono" officeooo:rsid="016048e8" officeooo:paragraph-rsid="016048e8"/>
    </style:style>
    <style:style style:name="P151" style:family="paragraph" style:parent-style-name="Table_20_Contents" style:list-style-name="L3">
      <style:text-properties style:font-name="Liberation Mono" officeooo:rsid="0143c1ce" officeooo:paragraph-rsid="0143c1ce"/>
    </style:style>
    <style:style style:name="P152" style:family="paragraph" style:parent-style-name="Table_20_Contents" style:list-style-name="L3">
      <style:text-properties style:font-name="Liberation Mono" officeooo:rsid="01619653" officeooo:paragraph-rsid="01619653"/>
    </style:style>
    <style:style style:name="P153" style:family="paragraph" style:parent-style-name="Table_20_Contents" style:list-style-name="L3">
      <style:text-properties style:font-name="Liberation Mono" officeooo:rsid="014499ee" officeooo:paragraph-rsid="014499ee"/>
    </style:style>
    <style:style style:name="P154" style:family="paragraph" style:parent-style-name="Table_20_Contents" style:list-style-name="L3">
      <style:text-properties style:font-name="Liberation Mono" officeooo:rsid="01469e6b" officeooo:paragraph-rsid="01469e6b"/>
    </style:style>
    <style:style style:name="P155" style:family="paragraph" style:parent-style-name="Table_20_Contents" style:list-style-name="L3">
      <style:text-properties style:font-name="Liberation Mono" officeooo:rsid="0145feab" officeooo:paragraph-rsid="0145feab"/>
    </style:style>
    <style:style style:name="P156" style:family="paragraph" style:parent-style-name="Table_20_Contents" style:list-style-name="L3">
      <style:text-properties style:font-name="Liberation Mono" officeooo:rsid="0148104c" officeooo:paragraph-rsid="0148104c"/>
    </style:style>
    <style:style style:name="P157" style:family="paragraph" style:parent-style-name="Table_20_Contents" style:list-style-name="L3">
      <style:text-properties style:font-name="Liberation Mono" officeooo:rsid="0149a882" officeooo:paragraph-rsid="0149a882"/>
    </style:style>
    <style:style style:name="P158" style:family="paragraph" style:parent-style-name="Table_20_Contents" style:list-style-name="L3">
      <style:text-properties style:font-name="Liberation Mono" officeooo:rsid="014bbe28" officeooo:paragraph-rsid="014bbe28"/>
    </style:style>
    <style:style style:name="P159" style:family="paragraph" style:parent-style-name="Table_20_Contents" style:list-style-name="L3">
      <style:text-properties style:font-name="Liberation Mono" officeooo:rsid="014e1674" officeooo:paragraph-rsid="014e1674"/>
    </style:style>
    <style:style style:name="P160" style:family="paragraph" style:parent-style-name="Table_20_Contents" style:list-style-name="L3">
      <style:text-properties style:font-name="Liberation Mono" officeooo:rsid="014e5102" officeooo:paragraph-rsid="014e5102"/>
    </style:style>
    <style:style style:name="P161" style:family="paragraph" style:parent-style-name="Table_20_Contents" style:list-style-name="L3">
      <style:text-properties style:font-name="Liberation Mono" officeooo:rsid="014ea1ce" officeooo:paragraph-rsid="014ea1ce"/>
    </style:style>
    <style:style style:name="P162" style:family="paragraph" style:parent-style-name="Table_20_Contents" style:list-style-name="L3">
      <style:text-properties style:font-name="Liberation Mono" officeooo:rsid="014fd7c7" officeooo:paragraph-rsid="014fd7c7"/>
    </style:style>
    <style:style style:name="P163" style:family="paragraph" style:parent-style-name="Table_20_Contents" style:list-style-name="L3">
      <style:text-properties style:font-name="Liberation Mono" officeooo:rsid="01510aa6" officeooo:paragraph-rsid="01510aa6"/>
    </style:style>
    <style:style style:name="P164" style:family="paragraph" style:parent-style-name="Table_20_Contents" style:list-style-name="L3">
      <style:text-properties style:font-name="Liberation Mono" officeooo:rsid="0152f362" officeooo:paragraph-rsid="0152f362"/>
    </style:style>
    <style:style style:name="P165" style:family="paragraph" style:parent-style-name="Table_20_Contents" style:list-style-name="L3">
      <style:text-properties style:font-name="Liberation Mono" officeooo:rsid="01510aa6" officeooo:paragraph-rsid="0152f362"/>
    </style:style>
    <style:style style:name="P166" style:family="paragraph" style:parent-style-name="Table_20_Contents" style:list-style-name="L3">
      <style:text-properties style:font-name="Liberation Mono" officeooo:rsid="0153e78e" officeooo:paragraph-rsid="0153e78e"/>
    </style:style>
    <style:style style:name="P167" style:family="paragraph" style:parent-style-name="Table_20_Contents" style:list-style-name="L3">
      <style:text-properties style:font-name="Liberation Mono" officeooo:rsid="015650d9" officeooo:paragraph-rsid="015650d9"/>
    </style:style>
    <style:style style:name="P168" style:family="paragraph" style:parent-style-name="Table_20_Contents" style:list-style-name="L3">
      <style:text-properties style:font-name="Liberation Mono" officeooo:rsid="015702fb" officeooo:paragraph-rsid="015702fb"/>
    </style:style>
    <style:style style:name="P169" style:family="paragraph" style:parent-style-name="Table_20_Contents" style:list-style-name="L3">
      <style:text-properties style:font-name="Liberation Mono" officeooo:rsid="015b4706" officeooo:paragraph-rsid="015b4706"/>
    </style:style>
    <style:style style:name="P170" style:family="paragraph" style:parent-style-name="Table_20_Contents" style:list-style-name="L3">
      <style:text-properties style:font-name="Liberation Mono" officeooo:rsid="015702fb" officeooo:paragraph-rsid="015b4706"/>
    </style:style>
    <style:style style:name="P171" style:family="paragraph" style:parent-style-name="Table_20_Contents" style:list-style-name="L3">
      <style:text-properties style:font-name="Liberation Mono" officeooo:rsid="015c3f73" officeooo:paragraph-rsid="015c3f73"/>
    </style:style>
    <style:style style:name="P172" style:family="paragraph" style:parent-style-name="Table_20_Contents">
      <style:paragraph-properties fo:text-align="left" style:justify-single-word="false"/>
      <style:text-properties style:font-name="Liberation Mono" officeooo:rsid="0164e0e8" officeooo:paragraph-rsid="0164e0e8"/>
    </style:style>
    <style:style style:name="P173" style:family="paragraph" style:parent-style-name="Table_20_Contents" style:list-style-name="L3">
      <style:text-properties style:font-name="Liberation Mono" officeooo:rsid="0164e808" officeooo:paragraph-rsid="0164e808"/>
    </style:style>
    <style:style style:name="P174" style:family="paragraph" style:parent-style-name="Table_20_Contents" style:list-style-name="L3">
      <style:text-properties style:font-name="Liberation Mono" officeooo:rsid="0165e71d" officeooo:paragraph-rsid="0165e71d"/>
    </style:style>
    <style:style style:name="P175" style:family="paragraph" style:parent-style-name="Table_20_Contents" style:list-style-name="L3">
      <style:text-properties style:font-name="Liberation Mono" officeooo:rsid="0165e71d" officeooo:paragraph-rsid="0168c857"/>
    </style:style>
    <style:style style:name="P176" style:family="paragraph" style:parent-style-name="Table_20_Contents" style:list-style-name="L3">
      <style:text-properties style:font-name="Liberation Mono" officeooo:rsid="0167d7dc" officeooo:paragraph-rsid="0167d7dc"/>
    </style:style>
    <style:style style:name="P177" style:family="paragraph" style:parent-style-name="Table_20_Contents" style:list-style-name="L3">
      <style:text-properties style:font-name="Liberation Mono" officeooo:rsid="016c6bd7" officeooo:paragraph-rsid="016c6bd7"/>
    </style:style>
    <style:style style:name="P178" style:family="paragraph" style:parent-style-name="Table_20_Contents" style:list-style-name="L3">
      <style:text-properties style:font-name="Liberation Mono" officeooo:rsid="016d2408" officeooo:paragraph-rsid="016d2408"/>
    </style:style>
    <style:style style:name="P179" style:family="paragraph" style:parent-style-name="Table_20_Contents">
      <style:text-properties style:font-name="Liberation Mono" officeooo:rsid="0165e71d" officeooo:paragraph-rsid="0165e71d"/>
    </style:style>
    <style:style style:name="P180" style:family="paragraph" style:parent-style-name="Table_20_Contents">
      <style:text-properties style:font-name="Liberation Mono" officeooo:rsid="016abf47" officeooo:paragraph-rsid="016abf47"/>
    </style:style>
    <style:style style:name="P181" style:family="paragraph" style:parent-style-name="Table_20_Contents">
      <style:paragraph-properties fo:text-align="center" style:justify-single-word="false"/>
      <style:text-properties style:font-name="Liberation Mono" officeooo:rsid="016abf47" officeooo:paragraph-rsid="016abf47"/>
    </style:style>
    <style:style style:name="P182" style:family="paragraph" style:parent-style-name="Table_20_Contents">
      <style:paragraph-properties fo:text-align="left" style:justify-single-word="false"/>
      <style:text-properties style:font-name="Liberation Mono" officeooo:rsid="016f8be9" officeooo:paragraph-rsid="016f8be9"/>
    </style:style>
    <style:style style:name="P183" style:family="paragraph" style:parent-style-name="Table_20_Contents" style:list-style-name="L4">
      <style:text-properties style:font-name="Liberation Mono" officeooo:rsid="016f95b6" officeooo:paragraph-rsid="016f95b6"/>
    </style:style>
    <style:style style:name="P184" style:family="paragraph" style:parent-style-name="Table_20_Contents" style:list-style-name="L4">
      <style:text-properties style:font-name="Liberation Mono" officeooo:rsid="0171aee8" officeooo:paragraph-rsid="0171aee8"/>
    </style:style>
    <style:style style:name="P185" style:family="paragraph" style:parent-style-name="Table_20_Contents" style:list-style-name="L4">
      <style:text-properties style:font-name="Liberation Mono" officeooo:rsid="01722f3c" officeooo:paragraph-rsid="01722f3c"/>
    </style:style>
    <style:style style:name="P186" style:family="paragraph" style:parent-style-name="Table_20_Contents" style:list-style-name="L4">
      <style:text-properties style:font-name="Liberation Mono" officeooo:rsid="0173ece3" officeooo:paragraph-rsid="0173ece3"/>
    </style:style>
    <style:style style:name="P187" style:family="paragraph" style:parent-style-name="Table_20_Contents" style:list-style-name="L4">
      <style:text-properties style:font-name="Liberation Mono" officeooo:rsid="0175b68d" officeooo:paragraph-rsid="0175b68d"/>
    </style:style>
    <style:style style:name="P188" style:family="paragraph" style:parent-style-name="Table_20_Contents" style:list-style-name="L4">
      <style:text-properties style:font-name="Liberation Mono" officeooo:rsid="0176e501" officeooo:paragraph-rsid="0176e501"/>
    </style:style>
    <style:style style:name="P189" style:family="paragraph" style:parent-style-name="Table_20_Contents" style:list-style-name="L4">
      <style:text-properties style:font-name="Liberation Mono" officeooo:rsid="0178e171" officeooo:paragraph-rsid="0178e171"/>
    </style:style>
    <style:style style:name="P190" style:family="paragraph" style:parent-style-name="Table_20_Contents" style:list-style-name="L4">
      <style:text-properties style:font-name="Liberation Mono" officeooo:rsid="017a0e1f" officeooo:paragraph-rsid="017a0e1f"/>
    </style:style>
    <style:style style:name="P191" style:family="paragraph" style:parent-style-name="Table_20_Contents">
      <style:paragraph-properties fo:text-align="left" style:justify-single-word="false"/>
      <style:text-properties style:font-name="Liberation Mono" officeooo:rsid="017b97fa" officeooo:paragraph-rsid="017b97fa"/>
    </style:style>
    <style:style style:name="P192" style:family="paragraph" style:parent-style-name="Table_20_Contents" style:list-style-name="L4">
      <style:text-properties style:font-name="Liberation Mono" officeooo:rsid="017c2c3b" officeooo:paragraph-rsid="017c2c3b"/>
    </style:style>
    <style:style style:name="P193" style:family="paragraph" style:parent-style-name="Table_20_Contents" style:list-style-name="L4">
      <style:text-properties style:font-name="Liberation Mono" officeooo:rsid="017cf929" officeooo:paragraph-rsid="017cf929"/>
    </style:style>
    <style:style style:name="P194" style:family="paragraph" style:parent-style-name="Table_20_Contents" style:list-style-name="L4">
      <style:text-properties style:font-name="Liberation Mono" officeooo:rsid="017e3768" officeooo:paragraph-rsid="017e3768"/>
    </style:style>
    <style:style style:name="P195" style:family="paragraph" style:parent-style-name="Table_20_Contents" style:list-style-name="L4">
      <style:text-properties style:font-name="Liberation Mono" officeooo:rsid="017fdf93" officeooo:paragraph-rsid="017fdf93"/>
    </style:style>
    <style:style style:name="P196" style:family="paragraph" style:parent-style-name="Table_20_Contents" style:list-style-name="L4">
      <style:text-properties style:font-name="Liberation Mono" officeooo:rsid="018121c5" officeooo:paragraph-rsid="018121c5"/>
    </style:style>
    <style:style style:name="P197" style:family="paragraph" style:parent-style-name="Table_20_Contents" style:list-style-name="L4">
      <style:text-properties style:font-name="Liberation Mono" officeooo:rsid="01830243" officeooo:paragraph-rsid="01830243"/>
    </style:style>
    <style:style style:name="P198" style:family="paragraph" style:parent-style-name="Table_20_Contents" style:list-style-name="L4">
      <style:text-properties style:font-name="Liberation Mono" officeooo:rsid="0184f19c" officeooo:paragraph-rsid="0184f19c"/>
    </style:style>
    <style:style style:name="P199" style:family="paragraph" style:parent-style-name="Table_20_Contents">
      <style:paragraph-properties fo:text-align="left" style:justify-single-word="false"/>
      <style:text-properties style:font-name="Liberation Mono" officeooo:rsid="01905d03" officeooo:paragraph-rsid="01905d03"/>
    </style:style>
    <style:style style:name="P200" style:family="paragraph" style:parent-style-name="Table_20_Contents">
      <style:paragraph-properties fo:text-align="left" style:justify-single-word="false"/>
      <style:text-properties style:font-name="Liberation Mono" officeooo:rsid="01912ae2" officeooo:paragraph-rsid="01912ae2"/>
    </style:style>
    <style:style style:name="P201" style:family="paragraph" style:parent-style-name="Table_20_Contents" style:list-style-name="L4">
      <style:text-properties style:font-name="Liberation Mono" officeooo:rsid="01912ae2" officeooo:paragraph-rsid="01912ae2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10e260" officeooo:paragraph-rsid="0010e260" style:font-weight-asian="bold" style:font-weight-complex="bold"/>
    </style:style>
    <style:style style:name="P203" style:family="paragraph" style:parent-style-name="Table_20_Contents">
      <style:text-properties fo:color="#127622" loext:opacity="100%" officeooo:rsid="0017b8b2" officeooo:paragraph-rsid="0017b8b2"/>
    </style:style>
    <style:style style:name="P204" style:family="paragraph" style:parent-style-name="Table_20_Contents">
      <style:text-properties officeooo:rsid="0017b8b2" officeooo:paragraph-rsid="0017b8b2"/>
    </style:style>
    <style:style style:name="P205" style:family="paragraph" style:parent-style-name="Table_20_Contents">
      <style:text-properties fo:color="#127622" loext:opacity="100%" officeooo:rsid="0024a0f0" officeooo:paragraph-rsid="0024a0f0"/>
    </style:style>
    <style:style style:name="P206" style:family="paragraph" style:parent-style-name="Table_20_Contents">
      <style:text-properties officeooo:rsid="0024a0f0" officeooo:paragraph-rsid="0024a0f0"/>
    </style:style>
    <style:style style:name="P207" style:family="paragraph" style:parent-style-name="Table_20_Contents">
      <style:text-properties fo:color="#127622" loext:opacity="100%" officeooo:rsid="001853fc" officeooo:paragraph-rsid="001853fc"/>
    </style:style>
    <style:style style:name="P208" style:family="paragraph" style:parent-style-name="Table_20_Contents">
      <style:text-properties officeooo:rsid="001853fc" officeooo:paragraph-rsid="001853fc"/>
    </style:style>
    <style:style style:name="P209" style:family="paragraph" style:parent-style-name="Table_20_Contents">
      <style:text-properties fo:color="#127622" loext:opacity="100%" officeooo:rsid="001fd072" officeooo:paragraph-rsid="001fd072"/>
    </style:style>
    <style:style style:name="P210" style:family="paragraph" style:parent-style-name="Table_20_Contents">
      <style:text-properties officeooo:rsid="001fd072" officeooo:paragraph-rsid="001fd072"/>
    </style:style>
    <style:style style:name="P211" style:family="paragraph" style:parent-style-name="Table_20_Contents">
      <style:text-properties fo:color="#127622" loext:opacity="100%" officeooo:rsid="0020500d" officeooo:paragraph-rsid="0020500d"/>
    </style:style>
    <style:style style:name="P212" style:family="paragraph" style:parent-style-name="Table_20_Contents">
      <style:text-properties officeooo:rsid="0020500d" officeooo:paragraph-rsid="0020500d"/>
    </style:style>
    <style:style style:name="P213" style:family="paragraph" style:parent-style-name="Table_20_Contents">
      <style:text-properties fo:color="#127622" loext:opacity="100%" officeooo:rsid="001a1a26" officeooo:paragraph-rsid="001a1a26"/>
    </style:style>
    <style:style style:name="P214" style:family="paragraph" style:parent-style-name="Table_20_Contents">
      <style:text-properties officeooo:rsid="001a1a26" officeooo:paragraph-rsid="001a1a26"/>
    </style:style>
    <style:style style:name="P215" style:family="paragraph" style:parent-style-name="Table_20_Contents">
      <style:text-properties fo:color="#127622" loext:opacity="100%" officeooo:rsid="001d858f" officeooo:paragraph-rsid="001d858f"/>
    </style:style>
    <style:style style:name="P216" style:family="paragraph" style:parent-style-name="Table_20_Contents">
      <style:text-properties officeooo:rsid="001d858f" officeooo:paragraph-rsid="001d858f"/>
    </style:style>
    <style:style style:name="P217" style:family="paragraph" style:parent-style-name="Table_20_Contents">
      <style:text-properties fo:color="#127622" loext:opacity="100%" officeooo:rsid="0021f61b" officeooo:paragraph-rsid="0021f61b"/>
    </style:style>
    <style:style style:name="P218" style:family="paragraph" style:parent-style-name="Table_20_Contents">
      <style:text-properties officeooo:rsid="0021f61b" officeooo:paragraph-rsid="0021f61b"/>
    </style:style>
    <style:style style:name="P219" style:family="paragraph" style:parent-style-name="Table_20_Contents">
      <style:text-properties officeooo:paragraph-rsid="0021f61b"/>
    </style:style>
    <style:style style:name="P220" style:family="paragraph" style:parent-style-name="Table_20_Contents">
      <style:text-properties fo:color="#127622" loext:opacity="100%" officeooo:rsid="0026b87d" officeooo:paragraph-rsid="0026b87d"/>
    </style:style>
    <style:style style:name="P221" style:family="paragraph" style:parent-style-name="Table_20_Contents">
      <style:text-properties officeooo:paragraph-rsid="0026b87d"/>
    </style:style>
    <style:style style:name="P222" style:family="paragraph" style:parent-style-name="Table_20_Contents">
      <style:text-properties officeooo:rsid="0026b87d" officeooo:paragraph-rsid="0026b87d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rsid="00f572ed" officeooo:paragraph-rsid="00f572ed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f4c489" officeooo:paragraph-rsid="012374e7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f5ab59" officeooo:paragraph-rsid="00f7d7bb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f67819" officeooo:paragraph-rsid="00f67819" style:font-weight-asian="bold" style:font-weight-complex="bold"/>
    </style:style>
    <style:style style:name="P227" style:family="paragraph" style:parent-style-name="Table_20_Contents">
      <style:text-properties officeooo:rsid="00f572ed" officeooo:paragraph-rsid="00f572ed"/>
    </style:style>
    <style:style style:name="P228" style:family="paragraph" style:parent-style-name="Table_20_Contents">
      <style:text-properties officeooo:rsid="012041d3"/>
    </style:style>
    <style:style style:name="P229" style:family="paragraph" style:parent-style-name="Table_20_Contents">
      <style:text-properties officeooo:rsid="01219c3d"/>
    </style:style>
    <style:style style:name="P230" style:family="paragraph" style:parent-style-name="Table_20_Contents">
      <style:text-properties officeooo:rsid="00f5ead0" officeooo:paragraph-rsid="00f5ead0"/>
    </style:style>
    <style:style style:name="P231" style:family="paragraph" style:parent-style-name="Table_20_Contents">
      <style:text-properties officeooo:paragraph-rsid="00f70ea7"/>
    </style:style>
    <style:style style:name="P232" style:family="paragraph" style:parent-style-name="Table_20_Contents">
      <style:text-properties officeooo:rsid="00f7f223" officeooo:paragraph-rsid="00f7f223"/>
    </style:style>
    <style:style style:name="P233" style:family="paragraph" style:parent-style-name="Table_20_Contents">
      <style:text-properties officeooo:rsid="00f8a3c7" officeooo:paragraph-rsid="00f8a3c7"/>
    </style:style>
    <style:style style:name="P234" style:family="paragraph" style:parent-style-name="Table_20_Contents">
      <style:text-properties officeooo:rsid="00f9df16" officeooo:paragraph-rsid="00f9df16"/>
    </style:style>
    <style:style style:name="P235" style:family="paragraph" style:parent-style-name="Table_20_Contents">
      <style:text-properties officeooo:rsid="00fae2e5" officeooo:paragraph-rsid="00fae2e5"/>
    </style:style>
    <style:style style:name="P236" style:family="paragraph" style:parent-style-name="Table_20_Contents">
      <style:text-properties officeooo:rsid="00fbc67e" officeooo:paragraph-rsid="00fbc67e"/>
    </style:style>
    <style:style style:name="P237" style:family="paragraph" style:parent-style-name="Table_20_Contents">
      <style:text-properties officeooo:rsid="00fd3a57" officeooo:paragraph-rsid="00fd3a57"/>
    </style:style>
    <style:style style:name="P238" style:family="paragraph" style:parent-style-name="Table_20_Contents">
      <style:text-properties officeooo:rsid="00fd6005" officeooo:paragraph-rsid="00fd6005"/>
    </style:style>
    <style:style style:name="P239" style:family="paragraph" style:parent-style-name="Table_20_Contents">
      <style:text-properties officeooo:rsid="00fe589e" officeooo:paragraph-rsid="00fe589e"/>
    </style:style>
    <style:style style:name="P240" style:family="paragraph" style:parent-style-name="Table_20_Contents">
      <style:text-properties officeooo:rsid="01019968" officeooo:paragraph-rsid="01019968"/>
    </style:style>
    <style:style style:name="P241" style:family="paragraph" style:parent-style-name="Table_20_Contents">
      <style:text-properties officeooo:paragraph-rsid="0100b970"/>
    </style:style>
    <style:style style:name="P242" style:family="paragraph" style:parent-style-name="Table_20_Contents">
      <style:text-properties officeooo:rsid="01032b84" officeooo:paragraph-rsid="01032b84"/>
    </style:style>
    <style:style style:name="P243" style:family="paragraph" style:parent-style-name="Table_20_Contents">
      <style:text-properties officeooo:rsid="01042ce6" officeooo:paragraph-rsid="01042ce6"/>
    </style:style>
    <style:style style:name="P244" style:family="paragraph" style:parent-style-name="Table_20_Contents">
      <style:text-properties officeooo:rsid="0104c6b1" officeooo:paragraph-rsid="0104c6b1"/>
    </style:style>
    <style:style style:name="P245" style:family="paragraph" style:parent-style-name="Table_20_Contents">
      <style:text-properties officeooo:rsid="01068335" officeooo:paragraph-rsid="01068335"/>
    </style:style>
    <style:style style:name="P246" style:family="paragraph" style:parent-style-name="Table_20_Contents">
      <style:text-properties officeooo:rsid="0106bf2f" officeooo:paragraph-rsid="0106bf2f"/>
    </style:style>
    <style:style style:name="P247" style:family="paragraph" style:parent-style-name="Table_20_Contents">
      <style:text-properties officeooo:rsid="010719d8" officeooo:paragraph-rsid="010719d8"/>
    </style:style>
    <style:style style:name="P248" style:family="paragraph" style:parent-style-name="Table_20_Contents">
      <style:text-properties officeooo:rsid="0108e2ea" officeooo:paragraph-rsid="0108e2ea"/>
    </style:style>
    <style:style style:name="P249" style:family="paragraph" style:parent-style-name="Table_20_Contents">
      <style:text-properties officeooo:rsid="010a4637" officeooo:paragraph-rsid="010a4637"/>
    </style:style>
    <style:style style:name="P250" style:family="paragraph" style:parent-style-name="Table_20_Contents">
      <style:text-properties officeooo:rsid="010b0a5d" officeooo:paragraph-rsid="010b0a5d"/>
    </style:style>
    <style:style style:name="P251" style:family="paragraph" style:parent-style-name="Table_20_Contents">
      <style:text-properties officeooo:rsid="010cdb13" officeooo:paragraph-rsid="010cdb13"/>
    </style:style>
    <style:style style:name="P252" style:family="paragraph" style:parent-style-name="Table_20_Contents">
      <style:text-properties officeooo:rsid="010cfd27" officeooo:paragraph-rsid="010cfd27"/>
    </style:style>
    <style:style style:name="P253" style:family="paragraph" style:parent-style-name="Table_20_Contents">
      <style:text-properties officeooo:rsid="010ec741" officeooo:paragraph-rsid="010ec741"/>
    </style:style>
    <style:style style:name="P254" style:family="paragraph" style:parent-style-name="Table_20_Contents">
      <style:text-properties officeooo:rsid="01104fe9" officeooo:paragraph-rsid="01104fe9"/>
    </style:style>
    <style:style style:name="P255" style:family="paragraph" style:parent-style-name="Table_20_Contents">
      <style:text-properties officeooo:rsid="01117b15" officeooo:paragraph-rsid="01117b15"/>
    </style:style>
    <style:style style:name="P256" style:family="paragraph" style:parent-style-name="Table_20_Contents">
      <style:text-properties officeooo:rsid="011223ad" officeooo:paragraph-rsid="011223ad"/>
    </style:style>
    <style:style style:name="T1" style:family="text">
      <style:text-properties officeooo:rsid="006c759e"/>
    </style:style>
    <style:style style:name="T2" style:family="text">
      <style:text-properties officeooo:rsid="00b0f542"/>
    </style:style>
    <style:style style:name="T3" style:family="text">
      <style:text-properties officeooo:rsid="00b108d0"/>
    </style:style>
    <style:style style:name="T4" style:family="text">
      <style:text-properties officeooo:rsid="00f30aa6"/>
    </style:style>
    <style:style style:name="T5" style:family="text">
      <style:text-properties officeooo:rsid="0137421c"/>
    </style:style>
    <style:style style:name="T6" style:family="text">
      <style:text-properties officeooo:rsid="0028abbc"/>
    </style:style>
    <style:style style:name="T7" style:family="text">
      <style:text-properties officeooo:rsid="002c8646"/>
    </style:style>
    <style:style style:name="T8" style:family="text">
      <style:text-properties officeooo:rsid="002a9b4f"/>
    </style:style>
    <style:style style:name="T9" style:family="text">
      <style:text-properties officeooo:rsid="003c3c50"/>
    </style:style>
    <style:style style:name="T10" style:family="text">
      <style:text-properties officeooo:rsid="00385d22"/>
    </style:style>
    <style:style style:name="T11" style:family="text">
      <style:text-properties officeooo:rsid="00321b45"/>
    </style:style>
    <style:style style:name="T12" style:family="text">
      <style:text-properties officeooo:rsid="002b15c7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c8646"/>
    </style:style>
    <style:style style:name="T15" style:family="text">
      <style:text-properties style:font-name="Liberation Sans1" officeooo:rsid="002b15c7"/>
    </style:style>
    <style:style style:name="T16" style:family="text">
      <style:text-properties style:font-name="Liberation Sans1" officeooo:rsid="00321b45"/>
    </style:style>
    <style:style style:name="T17" style:family="text">
      <style:text-properties style:font-name="Liberation Sans1" officeooo:rsid="003285eb"/>
    </style:style>
    <style:style style:name="T18" style:family="text">
      <style:text-properties officeooo:rsid="00f33a64"/>
    </style:style>
    <style:style style:name="T19" style:family="text">
      <style:text-properties officeooo:rsid="0079ecb8"/>
    </style:style>
    <style:style style:name="T20" style:family="text">
      <style:text-properties officeooo:rsid="007a9480"/>
    </style:style>
    <style:style style:name="T21" style:family="text">
      <style:text-properties officeooo:rsid="00514ba6"/>
    </style:style>
    <style:style style:name="T22" style:family="text">
      <style:text-properties fo:background-color="#ff0000" loext:char-shading-value="0"/>
    </style:style>
    <style:style style:name="T23" style:family="text">
      <style:text-properties officeooo:rsid="0053c608"/>
    </style:style>
    <style:style style:name="T24" style:family="text">
      <style:text-properties officeooo:rsid="0042849b"/>
    </style:style>
    <style:style style:name="T25" style:family="text">
      <style:text-properties officeooo:rsid="004b10f8"/>
    </style:style>
    <style:style style:name="T26" style:family="text">
      <style:text-properties officeooo:rsid="004b2492"/>
    </style:style>
    <style:style style:name="T27" style:family="text">
      <style:text-properties officeooo:rsid="00724a36"/>
    </style:style>
    <style:style style:name="T28" style:family="text">
      <style:text-properties officeooo:rsid="0054b0dc"/>
    </style:style>
    <style:style style:name="T29" style:family="text">
      <style:text-properties officeooo:rsid="0055ee5e"/>
    </style:style>
    <style:style style:name="T30" style:family="text">
      <style:text-properties officeooo:rsid="007bbab5"/>
    </style:style>
    <style:style style:name="T31" style:family="text">
      <style:text-properties officeooo:rsid="0061be77"/>
    </style:style>
    <style:style style:name="T32" style:family="text">
      <style:text-properties officeooo:rsid="00693b15"/>
    </style:style>
    <style:style style:name="T33" style:family="text">
      <style:text-properties officeooo:rsid="007ce74a"/>
    </style:style>
    <style:style style:name="T34" style:family="text">
      <style:text-properties officeooo:rsid="009db804"/>
    </style:style>
    <style:style style:name="T35" style:family="text">
      <style:text-properties officeooo:rsid="0189647b"/>
    </style:style>
    <style:style style:name="T36" style:family="text">
      <style:text-properties officeooo:rsid="00a920b0"/>
    </style:style>
    <style:style style:name="T37" style:family="text">
      <style:text-properties officeooo:rsid="0053bfe8"/>
    </style:style>
    <style:style style:name="T38" style:family="text">
      <style:text-properties officeooo:rsid="00acc193"/>
    </style:style>
    <style:style style:name="T39" style:family="text">
      <style:text-properties officeooo:rsid="00aed2e1"/>
    </style:style>
    <style:style style:name="T40" style:family="text">
      <style:text-properties officeooo:rsid="00ba7068"/>
    </style:style>
    <style:style style:name="T41" style:family="text">
      <style:text-properties officeooo:rsid="00bcee16"/>
    </style:style>
    <style:style style:name="T42" style:family="text">
      <style:text-properties officeooo:rsid="00bcee16" fo:background-color="transparent" loext:char-shading-value="0"/>
    </style:style>
    <style:style style:name="T43" style:family="text">
      <style:text-properties officeooo:rsid="00bcee16" fo:background-color="#ff0000" loext:char-shading-value="0"/>
    </style:style>
    <style:style style:name="T44" style:family="text">
      <style:text-properties officeooo:rsid="00c3f8f8"/>
    </style:style>
    <style:style style:name="T45" style:family="text">
      <style:text-properties officeooo:rsid="00bf9b74"/>
    </style:style>
    <style:style style:name="T46" style:family="text">
      <style:text-properties officeooo:rsid="00d8e4f3"/>
    </style:style>
    <style:style style:name="T47" style:family="text">
      <style:text-properties officeooo:rsid="00d00f5b"/>
    </style:style>
    <style:style style:name="T48" style:family="text">
      <style:text-properties officeooo:rsid="00c8519e"/>
    </style:style>
    <style:style style:name="T49" style:family="text">
      <style:text-properties officeooo:rsid="00d233d7" fo:background-color="#ff0000" loext:char-shading-value="0"/>
    </style:style>
    <style:style style:name="T50" style:family="text">
      <style:text-properties officeooo:rsid="00d233d7"/>
    </style:style>
    <style:style style:name="T51" style:family="text">
      <style:text-properties officeooo:rsid="00ed1313"/>
    </style:style>
    <style:style style:name="T52" style:family="text">
      <style:text-properties officeooo:rsid="01189673"/>
    </style:style>
    <style:style style:name="T53" style:family="text">
      <style:text-properties officeooo:rsid="011dc1dc"/>
    </style:style>
    <style:style style:name="T54" style:family="text">
      <style:text-properties officeooo:rsid="0163cbf9"/>
    </style:style>
    <style:style style:name="T55" style:family="text">
      <style:text-properties officeooo:rsid="0134dd82"/>
    </style:style>
    <style:style style:name="T56" style:family="text">
      <style:text-properties officeooo:rsid="0135e8c6"/>
    </style:style>
    <style:style style:name="T57" style:family="text">
      <style:text-properties officeooo:rsid="01330058"/>
    </style:style>
    <style:style style:name="T58" style:family="text">
      <style:text-properties officeooo:rsid="012f96aa"/>
    </style:style>
    <style:style style:name="T59" style:family="text">
      <style:text-properties officeooo:rsid="013cf7cc"/>
    </style:style>
    <style:style style:name="T60" style:family="text">
      <style:text-properties officeooo:rsid="013cf7cc" fo:background-color="#ff0000" loext:char-shading-value="0"/>
    </style:style>
    <style:style style:name="T61" style:family="text">
      <style:text-properties officeooo:rsid="014b0265"/>
    </style:style>
    <style:style style:name="T62" style:family="text">
      <style:text-properties officeooo:rsid="01425803" fo:background-color="#ff0000" loext:char-shading-value="0"/>
    </style:style>
    <style:style style:name="T63" style:family="text">
      <style:text-properties officeooo:rsid="01425803"/>
    </style:style>
    <style:style style:name="T64" style:family="text">
      <style:text-properties officeooo:rsid="01434dab"/>
    </style:style>
    <style:style style:name="T65" style:family="text">
      <style:text-properties officeooo:rsid="01434dab" fo:background-color="#ff0000" loext:char-shading-value="0"/>
    </style:style>
    <style:style style:name="T66" style:family="text">
      <style:text-properties officeooo:rsid="0160b8cb"/>
    </style:style>
    <style:style style:name="T67" style:family="text">
      <style:text-properties officeooo:rsid="0160b8cb" fo:background-color="#ff0000" loext:char-shading-value="0"/>
    </style:style>
    <style:style style:name="T68" style:family="text">
      <style:text-properties officeooo:rsid="014473dd"/>
    </style:style>
    <style:style style:name="T69" style:family="text">
      <style:text-properties officeooo:rsid="014473dd" fo:background-color="#ff0000" loext:char-shading-value="0"/>
    </style:style>
    <style:style style:name="T70" style:family="text">
      <style:text-properties officeooo:rsid="0162bf75"/>
    </style:style>
    <style:style style:name="T71" style:family="text">
      <style:text-properties officeooo:rsid="0162bf75" fo:background-color="#ff0000" loext:char-shading-value="0"/>
    </style:style>
    <style:style style:name="T72" style:family="text">
      <style:text-properties officeooo:rsid="0145cdbd"/>
    </style:style>
    <style:style style:name="T73" style:family="text">
      <style:text-properties officeooo:rsid="014a854f"/>
    </style:style>
    <style:style style:name="T74" style:family="text">
      <style:text-properties officeooo:rsid="014a147e"/>
    </style:style>
    <style:style style:name="T75" style:family="text">
      <style:text-properties officeooo:rsid="014a147e" fo:background-color="#ff0000" loext:char-shading-value="0"/>
    </style:style>
    <style:style style:name="T76" style:family="text">
      <style:text-properties officeooo:rsid="014c7e30"/>
    </style:style>
    <style:style style:name="T77" style:family="text">
      <style:text-properties officeooo:rsid="014c7e30" fo:background-color="#ff0000" loext:char-shading-value="0"/>
    </style:style>
    <style:style style:name="T78" style:family="text">
      <style:text-properties officeooo:rsid="0152f362"/>
    </style:style>
    <style:style style:name="T79" style:family="text">
      <style:text-properties officeooo:rsid="01551895"/>
    </style:style>
    <style:style style:name="T80" style:family="text">
      <style:text-properties officeooo:rsid="01551895" fo:background-color="#ff0000" loext:char-shading-value="0"/>
    </style:style>
    <style:style style:name="T81" style:family="text">
      <style:text-properties officeooo:rsid="0156c9db"/>
    </style:style>
    <style:style style:name="T82" style:family="text">
      <style:text-properties officeooo:rsid="0156c9db" fo:background-color="#ff0000" loext:char-shading-value="0"/>
    </style:style>
    <style:style style:name="T83" style:family="text">
      <style:text-properties officeooo:rsid="0159700f"/>
    </style:style>
    <style:style style:name="T84" style:family="text">
      <style:text-properties officeooo:rsid="01581e5a" fo:background-color="#ff0000" loext:char-shading-value="0"/>
    </style:style>
    <style:style style:name="T85" style:family="text">
      <style:text-properties officeooo:rsid="01581e5a"/>
    </style:style>
    <style:style style:name="T86" style:family="text">
      <style:text-properties officeooo:rsid="015a4b1d"/>
    </style:style>
    <style:style style:name="T87" style:family="text">
      <style:text-properties officeooo:rsid="01716e9f"/>
    </style:style>
    <style:style style:name="T88" style:family="text">
      <style:text-properties officeooo:rsid="016d6b5c"/>
    </style:style>
    <style:style style:name="T89" style:family="text">
      <style:text-properties officeooo:rsid="016ea49d"/>
    </style:style>
    <style:style style:name="T90" style:family="text">
      <style:text-properties officeooo:rsid="01797ff9"/>
    </style:style>
    <style:style style:name="T91" style:family="text">
      <style:text-properties officeooo:rsid="017b02db"/>
    </style:style>
    <style:style style:name="T92" style:family="text">
      <style:text-properties officeooo:rsid="018bb2df"/>
    </style:style>
    <style:style style:name="T93" style:family="text">
      <style:text-properties officeooo:rsid="018005ec"/>
    </style:style>
    <style:style style:name="T94" style:family="text">
      <style:text-properties officeooo:rsid="01830243"/>
    </style:style>
    <style:style style:name="T95" style:family="text">
      <style:text-properties officeooo:rsid="0183debc"/>
    </style:style>
    <style:style style:name="T96" style:family="text">
      <style:text-properties officeooo:rsid="00250906"/>
    </style:style>
    <style:style style:name="T97" style:family="text">
      <style:text-properties officeooo:rsid="01862b31"/>
    </style:style>
    <style:style style:name="T98" style:family="text">
      <style:text-properties officeooo:rsid="00f70ea7"/>
    </style:style>
    <style:style style:name="T99" style:family="text">
      <style:text-properties officeooo:rsid="0100b9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s between book titles, <text:span text:style-name="T1">Psalm inscriptions, Psalm 119 Hebrew letter inscriptions, and epistle colophons have been ommitted from comparision. </text:span><text:span text:style-name="T2">The </text:span><text:span text:style-name="T3">a</text:span><text:span text:style-name="T2">pocrypha has been ignored and omitted from comparisons.</text:span></text:p>
      <text:p text:style-name="P1"/>
      <text:p text:style-name="P2"><text:span text:style-name="T4">All comparisons were done aga</text:span>inst the “Holy Bible King James Version (Entire Bible) Concord.<text:span text:style-name="T4">txt</text:span>” from truthischrist.com <text:span text:style-name="T5">unless otherwise noted.</text:span></text:p>
      <text:p text:style-name="P3"/>
      <text:p text:style-name="P4">NOTE: There are also many <text:span text:style-name="T6">seemingly trivial </text:span>differences in capitalization <text:span text:style-name="T7">(LORD’S or LORD’s)</text:span>, <text:span text:style-name="T6">spelling (“</text:span><text:span text:style-name="T8">i</text:span><text:span text:style-name="T6">” </text:span><text:span text:style-name="T8">or</text:span><text:span text:style-name="T6"> “</text:span><text:span text:style-name="T8">e</text:span><text:span text:style-name="T6">”), </text:span><text:span text:style-name="T9">the formatting of </text:span><text:span text:style-name="T10">Psalm 119 Hebrew letter superscriptions, </text:span><text:span text:style-name="T11">and </text:span><text:span text:style-name="T12">hyphenation (</text:span><text:span text:style-name="T13">Elelohe-Israel </text:span><text:span text:style-name="T14">or</text:span><text:span text:style-name="T15"> EleloheIsrael). </text:span><text:span text:style-name="T16">The </text:span><text:span text:style-name="T17">seemingly </text:span><text:span text:style-name="T16">less trivial changes are documented below.</text:span></text:p>
      <text:p text:style-name="P5"/>
      <text:p text:style-name="P5">Pure Cambridge Edition checklist:</text:p>
      <text:p text:style-name="P5">1. "or Sheba" not "and Sheba" in Joshua 19:2</text:p>
      <text:p text:style-name="P5">2. "sin" not "sins" in 2 Chronicles 33:19</text:p>
      <text:p text:style-name="P5">3. "Spirit of God" not "spirit of God" in Job 33:4</text:p>
      <text:p text:style-name="P5">4. "whom ye" not "whom he" in Jeremiah 34:16</text:p>
      <text:p text:style-name="P5">5. "Spirit of God" not "spirit of God" in Ezekiel 11:24</text:p>
      <text:p text:style-name="P5">6. "flieth" not "fleeth" in Nahum 3:16</text:p>
      <text:p text:style-name="P5">7. "Spirit" not "spirit" in Matthew 4:1</text:p>
      <text:p text:style-name="P5">8. "further" not "farther" in Matthew 26:39</text:p>
      <text:p text:style-name="P5">9. "bewrayeth" not "betrayeth" in Matthew 26:73</text:p>
      <text:p text:style-name="P5">10. "Spirit" not "spirit" in Mark 1:12</text:p>
      <text:p text:style-name="P5">11. "spirit" not "Spirit" in Acts 11:28</text:p>
      <text:p text:style-name="P5">12. "spirit" not "Spirit" in 1 John 5:8 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Source</text:p>
          </table:table-cell>
          <table:table-cell table:style-name="Table2.A1" office:value-type="string">
            <text:p text:style-name="P7">File/edition name</text:p>
          </table:table-cell>
          <table:table-cell table:style-name="Table2.C1" office:value-type="string">
            <text:p text:style-name="P8">Notes</text:p>
          </table:table-cell>
        </table:table-row>
        <table:table-row>
          <table:table-cell table:style-name="Table2.A2" office:value-type="string">
            <text:p text:style-name="P9">Bibleanalyzer</text:p>
          </table:table-cell>
          <table:table-cell table:style-name="Table2.A2" office:value-type="string">
            <text:p text:style-name="P9">av1769, av1769s</text:p>
          </table:table-cell>
          <table:table-cell table:style-name="Table2.C2" office:value-type="string">
            <text:p text:style-name="P10">These two versions <text:span text:style-name="T18">from the same app </text:span>are not equal <text:span text:style-name="T19">in the verse text</text:span>. The av1769s has the extra “and” in Exo 23:23 and has some <text:span text:style-name="T20">of the</text:span> changes that appear in the PCE.</text:p>
          </table:table-cell>
        </table:table-row>
        <table:table-row>
          <table:table-cell table:style-name="Table2.A2" office:value-type="string">
            <text:p text:style-name="P11">https://truthischrist.com/elton-anomaly-823543/</text:p>
          </table:table-cell>
          <table:table-cell table:style-name="Table2.A2" office:value-type="string">
            <text:p text:style-name="P11">Holy Bible King James Version (Entire Bible) Concord</text:p>
            <text:p text:style-name="P11">Holy Bible Authorized Version (Entire Bible) PCE</text:p>
          </table:table-cell>
          <table:table-cell table:style-name="Table2.C2" office:value-type="string">
            <text:p text:style-name="P12">The PCE version has all of the changes listed below in the right column <text:span text:style-name="T21">and the Concord edition does not.</text:span></text:p>
            <text:p text:style-name="P12"/>
            <text:p text:style-name="P13">Concord:</text:p>
            <text:list text:style-name="L1">
              <text:list-item>
                <text:p text:style-name="P14">Romans 4:18</text:p>
                <text:list>
                  <text:list-item>
                    <text:p text:style-name="P14">“father of many nations<text:span text:style-name="T22">;</text:span>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5">Crosswire.org</text:p>
          </table:table-cell>
          <table:table-cell table:style-name="Table2.A2" office:value-type="string">
            <text:p text:style-name="P16">Crosswire King James Version: Pure Cambridge Edition</text:p>
            <text:p text:style-name="P16"/>
            <text:p text:style-name="P16"><text:span text:style-name="T23">Version </text:span>2.0 (2022-09-28) <text:span text:style-name="T24">(converted to sqlite using sword-converter 2.0.0)</text:span></text:p>
          </table:table-cell>
          <table:table-cell table:style-name="Table2.C2" office:value-type="string">
            <text:list text:style-name="L2">
              <text:list-item>
                <text:p text:style-name="P17">Many “LORD” changed to “Lord”.</text:p>
              </text:list-item>
              <text:list-item>
                <text:p text:style-name="P18">Many “GOD” changed to “God”.</text:p>
              </text:list-item>
              <text:list-item>
                <text:p text:style-name="P19">Extra “ THE” at the end of Ecc 12:14, Eze 48:35, <text:span text:style-name="T25">Job 42:17, </text:span><text:span text:style-name="T26">1Thess 5:28.</text:span></text:p>
              </text:list-item>
              <text:list-item>
                <text:p text:style-name="P20">Extra “ THE END” at the end of Rev 22:21</text:p>
              </text:list-item>
              <text:list-item>
                <text:p text:style-name="P21">All of the changes in the table below (typical of the PCE)</text:p>
              </text:list-item>
            </text:list>
          </table:table-cell>
        </table:table-row>
        <table:table-row>
          <table:table-cell table:style-name="Table2.A2" office:value-type="string">
            <text:p text:style-name="P22">Crosswire.org</text:p>
          </table:table-cell>
          <table:table-cell table:style-name="Table2.A2" office:value-type="string">
            <text:p text:style-name="P11">King James Version (1769) with Strongs Numbers and Morphology and CatchWords </text:p>
            <text:p text:style-name="P11"/>
            <text:p text:style-name="P11"><text:span text:style-name="T23">Version </text:span>3.1 (2023-07-19)</text:p>
          </table:table-cell>
          <table:table-cell table:style-name="Table2.C2" office:value-type="string">
            <text:list text:style-name="L3">
              <text:list-item>
                <text:p text:style-name="P23">First word of <text:span text:style-name="T27">almost</text:span> every <text:span text:style-name="T28">verse</text:span> capitalized.</text:p>
              </text:list-item>
              <text:list-item>
                <text:p text:style-name="P23">“<text:span text:style-name="T29">JEHOVAH” changed to “Jehovah”</text:span></text:p>
              </text:list-item>
              <text:list-item>
                <text:p text:style-name="P24">Job 31:1 “I MADE” insead of “I made”</text:p>
              </text:list-item>
              <text:list-item>
                <text:p text:style-name="P25">Gen 2:9 Comma removed after “sight”</text:p>
              </text:list-item>
              <text:list-item>
                <text:p text:style-name="P26">Joshua 19:2 “or” removed from before “Sheba”</text:p>
              </text:list-item>
              <text:list-item>
                <text:p text:style-name="P27">Gen 1:2 Missing comma after “form”</text:p>
              </text:list-item>
              <text:list-item>
                <text:p text:style-name="P28">Exo 17:15 “JEHOVAH-nissi” instead of “Jehovah-nissi”</text:p>
              </text:list-item>
            </text:list>
          </table:table-cell>
        </table:table-row>
        <table:table-row>
          <table:table-cell table:style-name="Table2.A2" office:value-type="string">
            <text:p text:style-name="P29">e<text:span text:style-name="T30">Bi</text:span>ble.org</text:p>
          </table:table-cell>
          <table:table-cell table:style-name="Table2.A2" office:value-type="string">
            <text:p text:style-name="P11">King James (Authorized) Version <text:span text:style-name="T31">eng-kjv2006_readaloud.zip (Plain text canon only chapter files) v28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30">First word of <text:span text:style-name="T27">almost</text:span> every verse capitalized.</text:p>
              </text:list-item>
              <text:list-item>
                <text:p text:style-name="P31">Gen 25:4</text:p>
                <text:list>
                  <text:list-item>
                    <text:p text:style-name="P31">“Abidah” instead of “Abida”</text:p>
                  </text:list-item>
                </text:list>
              </text:list-item>
              <text:list-item>
                <text:p text:style-name="P32">Gen 42:56</text:p>
                <text:list>
                  <text:list-item>
                    <text:p text:style-name="P32">“and Joseph” instead of “And Joseph”</text:p>
                  </text:list-item>
                </text:list>
              </text:list-item>
              <text:list-item>
                <text:p text:style-name="P33">Acts 4:20</text:p>
                <text:list>
                  <text:list-item>
                    <text:p text:style-name="P33">“can not” instead of “cannot”</text:p>
                  </text:list-item>
                </text:list>
              </text:list-item>
              <text:list-item>
                <text:p text:style-name="P34">Col 3:17,<text:span text:style-name="T32">23</text:span></text:p>
                <text:list>
                  <text:list-item>
                    <text:p text:style-name="P34">“what soever” instead of “whatsoever”</text:p>
                  </text:list-item>
                </text:list>
              </text:list-item>
              <text:list-item>
                <text:p text:style-name="P35">1Ti 2:7</text:p>
                <text:list>
                  <text:list-item>
                    <text:p text:style-name="P35">“Where unto” instead of “Whereunto”</text:p>
                  </text:list-item>
                </text:list>
              </text:list-item>
              <text:list-item>
                <text:p text:style-name="P36">1Ti 5:25</text:p>
                <text:list>
                  <text:list-item>
                    <text:p text:style-name="P36">“can not” instead of “cannot”</text:p>
                  </text:list-item>
                </text:list>
              </text:list-item>
              <text:list-item>
                <text:p text:style-name="P37">1Ti 6:12</text:p>
                <text:list>
                  <text:list-item>
                    <text:p text:style-name="P37">“where unto” instead of “whereunto”</text:p>
                  </text:list-item>
                </text:list>
              </text:list-item>
              <text:list-item>
                <text:p text:style-name="P38">2Ti 1:11</text:p>
                <text:list>
                  <text:list-item>
                    <text:p text:style-name="P38">“Where unto” instead of “Whereunto”</text:p>
                  </text:list-item>
                </text:list>
              </text:list-item>
              <text:list-item>
                <text:p text:style-name="P39">2Ti 2:9</text:p>
                <text:list>
                  <text:list-item>
                    <text:p text:style-name="P39">“Where in” instead of “Wherein”</text:p>
                  </text:list-item>
                </text:list>
              </text:list-item>
              <text:list-item>
                <text:p text:style-name="P40">2Ti 2:13</text:p>
                <text:list>
                  <text:list-item>
                    <text:p text:style-name="P40">“can not” instead of “cannot”</text:p>
                  </text:list-item>
                </text:list>
              </text:list-item>
              <text:list-item>
                <text:p text:style-name="P41">Hebrews 6:17</text:p>
                <text:list>
                  <text:list-item>
                    <text:p text:style-name="P41">“Where in” instead of “Wherein”</text:p>
                  </text:list-item>
                </text:list>
              </text:list-item>
              <text:list-item>
                <text:p text:style-name="P42">Hebrews 9:5</text:p>
                <text:list>
                  <text:list-item>
                    <text:p text:style-name="P42">“can not” instead of “cannot”</text:p>
                  </text:list-item>
                </text:list>
              </text:list-item>
              <text:list-item>
                <text:p text:style-name="P43">1 John 2:23</text:p>
                <text:list>
                  <text:list-item>
                    <text:p text:style-name="P43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44">eBible.org</text:p>
          </table:table-cell>
          <table:table-cell table:style-name="Table2.A2" office:value-type="string">
            <text:p text:style-name="P11">KJV Cambridge Paragraph Bible <text:span text:style-name="T33">v9.27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45">Many beginning-of-verse words lowercased instead of capitalized</text:p>
              </text:list-item>
              <text:list-item>
                <text:p text:style-name="P46">Extremely large amount of word spelling changes <text:span text:style-name="T34">(some of which could change interpretation and doctrine; </text:span><text:span text:style-name="T35">only some are listed</text:span><text:span text:style-name="T34">)</text:span></text:p>
              </text:list-item>
              <text:list-item>
                <text:p text:style-name="P47">Extremely large amount of punctuation changes.</text:p>
              </text:list-item>
              <text:list-item>
                <text:p text:style-name="P48">Many “ye” changed to ambiguous “you”</text:p>
              </text:list-item>
              <text:list-item>
                <text:p text:style-name="P49">Gen 19:21</text:p>
                <text:list>
                  <text:list-item>
                    <text:p text:style-name="P49">“also” removed after “concerning this thing”</text:p>
                  </text:list-item>
                </text:list>
              </text:list-item>
              <text:list-item>
                <text:p text:style-name="P50">Exod 29:26</text:p>
                <text:list>
                  <text:list-item>
                    <text:p text:style-name="P50">“consecration<text:span text:style-name="T22">s</text:span>” instead of “consecration”</text:p>
                  </text:list-item>
                </text:list>
              </text:list-item>
              <text:list-item>
                <text:p text:style-name="P51">Num 17:8</text:p>
                <text:list>
                  <text:list-item>
                    <text:p text:style-name="P51">“<text:span text:style-name="T22">w</text:span>itness; and<text:span text:style-name="T22">,</text:span> behold,” changed to “<text:span text:style-name="T22">W</text:span>itness; and<text:span text:style-name="T22"> </text:span>behold,”</text:p>
                  </text:list-item>
                </text:list>
              </text:list-item>
              <text:list-item>
                <text:p text:style-name="P52">Num 29:39</text:p>
                <text:list>
                  <text:list-item>
                    <text:p text:style-name="P52">“besides” instead of “beside”</text:p>
                  </text:list-item>
                </text:list>
              </text:list-item>
              <text:list-item>
                <text:p text:style-name="P53">Psalm 119 Hebrew inscriptions are written in Hebrew instead of English</text:p>
              </text:list-item>
              <text:list-item>
                <text:p text:style-name="P54">Judges 11:29</text:p>
                <text:list>
                  <text:list-item>
                    <text:p text:style-name="P5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5">Judges 21:11</text:p>
                <text:list>
                  <text:list-item>
                    <text:p text:style-name="P55">“lain” changed to “lien”</text:p>
                  </text:list-item>
                  <text:list-item>
                    <text:p text:style-name="P56">Completely different definition</text:p>
                  </text:list-item>
                </text:list>
              </text:list-item>
              <text:list-item>
                <text:p text:style-name="P57">1 Samuel 16:13</text:p>
                <text:list>
                  <text:list-item>
                    <text:p text:style-name="P58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9">2 Samuel 3:31</text:p>
                <text:list>
                  <text:list-item>
                    <text:p text:style-name="P59">“Ren<text:span text:style-name="T22">d</text:span>” changed to “Ren<text:span text:style-name="T22">t</text:span>”</text:p>
                  </text:list-item>
                </text:list>
              </text:list-item>
              <text:list-item>
                <text:p text:style-name="P60">1 Kings 9:22</text:p>
                <text:list>
                  <text:list-item>
                    <text:p text:style-name="P60">“bondmen” changed to “bondman”</text:p>
                  </text:list-item>
                </text:list>
              </text:list-item>
              <text:list-item>
                <text:p text:style-name="P61">1 Kings 9:28</text:p>
                <text:list>
                  <text:list-item>
                    <text:p text:style-name="P61">“fetched” changed to “fet”</text:p>
                  </text:list-item>
                </text:list>
              </text:list-item>
              <text:list-item>
                <text:p text:style-name="P62">1 Chronicles 7:5</text:p>
                <text:list>
                  <text:list-item>
                    <text:p text:style-name="P62">“valiant” removed from after “Issachar were”</text:p>
                  </text:list-item>
                </text:list>
              </text:list-item>
              <text:list-item>
                <text:p text:style-name="P63">Isaiah <text:span text:style-name="T36">34:14</text:span></text:p>
                <text:list>
                  <text:list-item>
                    <text:p text:style-name="P63">“screech owl” changed to “shrich owl”</text:p>
                  </text:list-item>
                </text:list>
              </text:list-item>
              <text:list-item>
                <text:p text:style-name="P64">Ezekiel 43:27</text:p>
                <text:list>
                  <text:list-item>
                    <text:p text:style-name="P65">“<text:span text:style-name="T37">eighth</text:span> day” changed to “eight day”</text:p>
                  </text:list-item>
                </text:list>
              </text:list-item>
              <text:list-item>
                <text:p text:style-name="P66">Ezekiel 44:29</text:p>
                <text:list>
                  <text:list-item>
                    <text:p text:style-name="P66">“dedicated” changed to “dedicate”</text:p>
                  </text:list-item>
                </text:list>
              </text:list-item>
              <text:list-item>
                <text:p text:style-name="P67">Daniel 2:27</text:p>
                <text:list>
                  <text:list-item>
                    <text:p text:style-name="P67">“astrologers” changed to “astrologians”</text:p>
                  </text:list-item>
                </text:list>
              </text:list-item>
              <text:list-item>
                <text:p text:style-name="P68">Hosea 14:7</text:p>
                <text:list>
                  <text:list-item>
                    <text:p text:style-name="P68">“<text:span text:style-name="T38">the scent” changed to “The sent”</text:span></text:p>
                  </text:list-item>
                </text:list>
              </text:list-item>
              <text:list-item>
                <text:p text:style-name="P69">Zechariah 2:1</text:p>
                <text:list>
                  <text:list-item>
                    <text:p text:style-name="P69">“I <text:span text:style-name="T39">lifted</text:span>” changed to “I lift”</text:p>
                  </text:list-item>
                </text:list>
              </text:list-item>
              <text:list-item>
                <text:p text:style-name="P70">Malachi 3:2</text:p>
                <text:list>
                  <text:list-item>
                    <text:p text:style-name="P70">“fullers’ soap” changed to “fullers’ sope”</text:p>
                  </text:list-item>
                </text:list>
              </text:list-item>
              <text:list-item>
                <text:p text:style-name="P71">Matthew 14:30</text:p>
                <text:list>
                  <text:list-item>
                    <text:p text:style-name="P71">“boisterous” changed to “boysterous”</text:p>
                  </text:list-item>
                </text:list>
              </text:list-item>
              <text:list-item>
                <text:p text:style-name="P72">Matthew 19:26</text:p>
                <text:list>
                  <text:list-item>
                    <text:p text:style-name="P72">“impossible” changed to “unpossible”</text:p>
                  </text:list-item>
                </text:list>
              </text:list-item>
              <text:list-item>
                <text:p text:style-name="P73">Luke 13:12</text:p>
                <text:list>
                  <text:list-item>
                    <text:p text:style-name="P73">“thine infirmity” changed to “thy infirmity”</text:p>
                  </text:list-item>
                </text:list>
              </text:list-item>
              <text:list-item>
                <text:p text:style-name="P74">Acts 10:19</text:p>
                <text:list>
                  <text:list-item>
                    <text:p text:style-name="P7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5">Acts 11:28</text:p>
                <text:list>
                  <text:list-item>
                    <text:p text:style-name="P76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7">1 Timothy 2:9</text:p>
                <text:list>
                  <text:list-item>
                    <text:p text:style-name="P77">“shamefacedness” changed to “shamefastness”</text:p>
                  </text:list-item>
                </text:list>
              </text:list-item>
              <text:list-item>
                <text:p text:style-name="P78">Revelation 6:14</text:p>
                <text:list>
                  <text:list-item>
                    <text:p text:style-name="P78">“<text:span text:style-name="T40">scroll” changed to “scrole”</text:span></text:p>
                  </text:list-item>
                </text:list>
              </text:list-item>
              <text:list-item>
                <text:p text:style-name="P79">Revelation 11:11</text:p>
                <text:list>
                  <text:list-item>
                    <text:p text:style-name="P79">“a<text:span text:style-name="T22">n</text:span> half the <text:span text:style-name="T22">S</text:span>pirit” <text:span text:style-name="T41">changed to “a</text:span><text:span text:style-name="T42"> </text:span><text:span text:style-name="T41">half the </text:span><text:span text:style-name="T43">s</text:span><text:span text:style-name="T41">pirit”</text:span></text:p>
                  </text:list-item>
                </text:list>
              </text:list-item>
              <text:list-item>
                <text:p text:style-name="P80">1 John 5:8</text:p>
                <text:list>
                  <text:list-item>
                    <text:p text:style-name="P80">“Spirit” instead of “spirit” (compared to the PCE)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1">eBible.org</text:p>
          </table:table-cell>
          <table:table-cell table:style-name="Table2.A2" office:value-type="string">
            <text:p text:style-name="P11">King James Version + Apocrypha engKJV1769eb <text:span text:style-name="T44">v67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82">6x “cannot” changed to “can not”</text:p>
              </text:list-item>
              <text:list-item>
                <text:p text:style-name="P82">Gen 25:4</text:p>
                <text:list>
                  <text:list-item>
                    <text:p text:style-name="P82">“Abida” changed to “Abidah”</text:p>
                  </text:list-item>
                  <text:list-item>
                    <text:p text:style-name="P82">1Ch 1:33 “Abida” not changed</text:p>
                  </text:list-item>
                </text:list>
              </text:list-item>
              <text:list-item>
                <text:p text:style-name="P82">“instructors” <text:span text:style-name="T45">changed to “instructers“</text:span></text:p>
              </text:list-item>
              <text:list-item>
                <text:p text:style-name="P83">2x “whatsoever” changed to “what soever”</text:p>
              </text:list-item>
              <text:list-item>
                <text:p text:style-name="P83">2x “Whereunto” changed to “Where unto”</text:p>
              </text:list-item>
              <text:list-item>
                <text:p text:style-name="P83">1x “whereunto” changed to “where unto”</text:p>
              </text:list-item>
              <text:list-item>
                <text:p text:style-name="P84">2x “Wherein” changed to “Where in”</text:p>
              </text:list-item>
              <text:list-item>
                <text:p text:style-name="P85">1 John 2:23</text:p>
                <text:list>
                  <text:list-item>
                    <text:p text:style-name="P85">“(but)” changed to “[but]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6">Project Gutenberg</text:p>
          </table:table-cell>
          <table:table-cell table:style-name="Table2.A2" office:value-type="string">
            <text:p text:style-name="P11">The King James Version of the Bible</text:p>
            <text:p text:style-name="P87">Release date: August 1, 1989 [eBook #10]</text:p>
            <text:p text:style-name="P87">Most recently updated: October 29, 2024</text:p>
          </table:table-cell>
          <table:table-cell table:style-name="Table2.C2" office:value-type="string">
            <text:list text:continue-numbering="true" text:style-name="L3">
              <text:list-item>
                <text:p text:style-name="P88">Many spelling <text:span text:style-name="T46">and punctuation </text:span>changes</text:p>
              </text:list-item>
              <text:list-item>
                <text:p text:style-name="P88">“<text:span text:style-name="T47">ye” changed to ambiguous “you”</text:span></text:p>
              </text:list-item>
              <text:list-item>
                <text:p text:style-name="P89">Gen 5:3</text:p>
                <text:list>
                  <text:list-item>
                    <text:p text:style-name="P89">“<text:span text:style-name="T48">and” added before “after his image”</text:span></text:p>
                  </text:list-item>
                </text:list>
              </text:list-item>
              <text:list-item>
                <text:p text:style-name="P90">Gen 6:16</text:p>
                <text:list>
                  <text:list-item>
                    <text:p text:style-name="P90">“thy maid is in <text:span text:style-name="T22">thy</text:span> hand” changed to “thy maid is in <text:span text:style-name="T22">thine</text:span> hand”</text:p>
                  </text:list-item>
                </text:list>
              </text:list-item>
              <text:list-item>
                <text:p text:style-name="P91">Exodus 25:34</text:p>
                <text:list>
                  <text:list-item>
                    <text:p text:style-name="P91">“candlestick” changed to “candlesticks”</text:p>
                  </text:list-item>
                </text:list>
              </text:list-item>
              <text:list-item>
                <text:p text:style-name="P92">Leviticus 26:11</text:p>
                <text:list>
                  <text:list-item>
                    <text:p text:style-name="P92">“And I <text:span text:style-name="T22">will</text:span> set my tabernacle” changed to “And I set my tabernacle”</text:p>
                  </text:list-item>
                </text:list>
              </text:list-item>
              <text:list-item>
                <text:p text:style-name="P93">Joshua 13:14</text:p>
                <text:list>
                  <text:list-item>
                    <text:p text:style-name="P93">“tribe of Levi” changed to “tribes of Levi”</text:p>
                  </text:list-item>
                </text:list>
              </text:list-item>
              <text:list-item>
                <text:p text:style-name="P94">Nehemiah 9:28</text:p>
                <text:list>
                  <text:list-item>
                    <text:p text:style-name="P94">“<text:span text:style-name="T49">hand</text:span><text:span text:style-name="T50"> of their enemies” changed to “</text:span><text:span text:style-name="T49">land</text:span><text:span text:style-name="T50"> of their enemies”</text:span></text:p>
                  </text:list-item>
                </text:list>
              </text:list-item>
              <text:list-item>
                <text:p text:style-name="P95">Job 33:4</text:p>
                <text:list>
                  <text:list-item>
                    <text:p text:style-name="P95">“<text:span text:style-name="T22">S</text:span>pirit of God” changed to “<text:span text:style-name="T22">s</text:span>pirit of God”</text:p>
                  </text:list-item>
                </text:list>
              </text:list-item>
              <text:list-item>
                <text:p text:style-name="P96">Psalm 32:5</text:p>
                <text:list>
                  <text:list-item>
                    <text:p text:style-name="P96">“I acknowledg<text:span text:style-name="T22">ed</text:span>” changed to “I acknowledge”</text:p>
                  </text:list-item>
                </text:list>
              </text:list-item>
              <text:list-item>
                <text:p text:style-name="P97">Matthew 4:1</text:p>
                <text:list>
                  <text:list-item>
                    <text:p text:style-name="P97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98">Many “<text:span text:style-name="T22">S</text:span>on of David” (referring to Jesus) changed to “<text:span text:style-name="T22">s</text:span>on of David”</text:p>
              </text:list-item>
              <text:list-item>
                <text:p text:style-name="P99">Mark 1:2</text:p>
                <text:list>
                  <text:list-item>
                    <text:p text:style-name="P100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101">Mark 15:2</text:p>
                <text:list>
                  <text:list-item>
                    <text:p text:style-name="P101">“said unto <text:span text:style-name="T22">him</text:span>” changed to “said unto <text:span text:style-name="T22">them</text:span>”</text:p>
                  </text:list-item>
                </text:list>
              </text:list-item>
              <text:list-item>
                <text:p text:style-name="P102">Acts 13:22</text:p>
                <text:list>
                  <text:list-item>
                    <text:p text:style-name="P102">“he gave testimony” changed to “he gave <text:span text:style-name="T22">their</text:span> testimony”</text:p>
                  </text:list-item>
                </text:list>
              </text:list-item>
              <text:list-item>
                <text:p text:style-name="P103">1 John 2:23</text:p>
                <text:list>
                  <text:list-item>
                    <text:p text:style-name="P103">“(but)” removed</text:p>
                  </text:list-item>
                </text:list>
              </text:list-item>
              <text:list-item>
                <text:p text:style-name="P104">Revelation 11:11</text:p>
                <text:list>
                  <text:list-item>
                    <text:p text:style-name="P104">“<text:span text:style-name="T22">S</text:span>pirit of life” changed to “<text:span text:style-name="T22">s</text:span>pirit of life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05">OpenBible.com</text:p>
          </table:table-cell>
          <table:table-cell table:style-name="Table2.A2" office:value-type="string">
            <text:p text:style-name="P105">Pure Cambridge edition (text courtest of www.BibleProtector.com)</text:p>
          </table:table-cell>
          <table:table-cell table:style-name="Table2.C2" office:value-type="string">
            <text:list text:continue-numbering="true" text:style-name="L3">
              <text:list-item>
                <text:p text:style-name="P106">Has all the typical PCE changed in the right column below</text:p>
              </text:list-item>
            </text:list>
          </table:table-cell>
        </table:table-row>
        <table:table-row>
          <table:table-cell table:style-name="Table2.A2" office:value-type="string">
            <text:p text:style-name="P107">Archive.org</text:p>
            <text:p text:style-name="P107">(https://archive.org/details/kjv-text-files)</text:p>
          </table:table-cell>
          <table:table-cell table:style-name="Table2.A2" office:value-type="string">
            <text:p text:style-name="P108">TXT files of the King James Version of the Holy Bible</text:p>
            <text:p text:style-name="P108">2021-12-27 20:39:55</text:p>
            <text:p text:style-name="P108"/>
          </table:table-cell>
          <table:table-cell table:style-name="Table2.C2" office:value-type="string">
            <text:list text:continue-numbering="true" text:style-name="L3">
              <text:list-item>
                <text:p text:style-name="P109">1 Samuel 6:9</text:p>
                <text:list>
                  <text:list-item>
                    <text:p text:style-name="P109">“that smote us<text:span text:style-name="T22">:</text:span>” instead of “that smote us<text:span text:style-name="T22">;</text:span>”</text:p>
                  </text:list-item>
                  <text:list-item>
                    <text:p text:style-name="P109">Appears to be correct, and the Concord has the wrong character</text:p>
                  </text:list-item>
                </text:list>
              </text:list-item>
              <text:list-item>
                <text:p text:style-name="P110">1 Chronicles 2:47</text:p>
                <text:list>
                  <text:list-item>
                    <text:p text:style-name="P110">“Gesha<text:span text:style-name="T22">m</text:span>” instead of “Gesha<text:span text:style-name="T22">n</text:span>”</text:p>
                  </text:list-item>
                </text:list>
              </text:list-item>
              <text:list-item>
                <text:p text:style-name="P111">1 Chronicles 2:49</text:p>
                <text:list>
                  <text:list-item>
                    <text:p text:style-name="P111">“Achsa” instead of “Achsa<text:span text:style-name="T22">h</text:span>”</text:p>
                  </text:list-item>
                </text:list>
              </text:list-item>
              <text:list-item>
                <text:p text:style-name="P112">1 Chronicles 7:19</text:p>
                <text:list>
                  <text:list-item>
                    <text:p text:style-name="P112">“Shemida” instead of “Shemida”</text:p>
                  </text:list-item>
                </text:list>
              </text:list-item>
              <text:list-item>
                <text:p text:style-name="P113">2 Chronicles 2:16</text:p>
                <text:list>
                  <text:list-item>
                    <text:p text:style-name="P113">“flotes” instead of “floats”</text:p>
                  </text:list-item>
                </text:list>
              </text:list-item>
              <text:list-item>
                <text:p text:style-name="P114">Jeremiah 2:22</text:p>
                <text:list>
                  <text:list-item>
                    <text:p text:style-name="P114">“<text:span text:style-name="T51">sope” instead of “soap”</text:span></text:p>
                  </text:list-item>
                </text:list>
              </text:list-item>
              <text:list-item>
                <text:p text:style-name="P115">Malachi 3:2</text:p>
                <text:list>
                  <text:list-item>
                    <text:p text:style-name="P115">“sope instead of “soap”</text:p>
                  </text:list-item>
                </text:list>
              </text:list-item>
              <text:list-item>
                <text:p text:style-name="P116">Romans 4:18</text:p>
                <text:list>
                  <text:list-item>
                    <text:p text:style-name="P116">“nations,” instead of “nations;”</text:p>
                  </text:list-item>
                  <text:list-item>
                    <text:p text:style-name="P117">Appears to be correct, and the Concord has the wrong character</text:p>
                  </text:list-item>
                </text:list>
              </text:list-item>
              <text:list-item>
                <text:p text:style-name="P118">1 John 2:23</text:p>
                <text:list>
                  <text:list-item>
                    <text:p text:style-name="P118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19">Keith Gibson</text:p>
          </table:table-cell>
          <table:table-cell table:style-name="Table2.A2" office:value-type="string">
            <text:p text:style-name="P119">Old printed Bible “Holy Bible” (1,838m 1925) American Bible Society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0">Exo 23:23</text:p>
                <text:list>
                  <text:list-item>
                    <text:p text:style-name="P120">“A<text:span text:style-name="T52">ngel</text:span>”</text:p>
                  </text:list-item>
                  <text:list-item>
                    <text:p text:style-name="P120">No extra “and”</text:p>
                  </text:list-item>
                </text:list>
              </text:list-item>
              <text:list-item>
                <text:p text:style-name="P121">1 John 5:8</text:p>
                <text:list>
                  <text:list-item>
                    <text:p text:style-name="P121">“spirit”</text:p>
                  </text:list-item>
                </text:list>
              </text:list-item>
              <text:list-item>
                <text:p text:style-name="P122">Acts 11:28</text:p>
                <text:list>
                  <text:list-item>
                    <text:p text:style-name="P122">“Spirit”</text:p>
                  </text:list-item>
                </text:list>
              </text:list-item>
              <text:list-item>
                <text:p text:style-name="P123">Acts 21:4</text:p>
                <text:list>
                  <text:list-item>
                    <text:p text:style-name="P123">“Spirit”</text:p>
                  </text:list-item>
                </text:list>
              </text:list-item>
              <text:list-item>
                <text:p text:style-name="P124">Matthew 4:1, Mark 1:12, Luke 4:1</text:p>
                <text:list>
                  <text:list-item>
                    <text:p text:style-name="P124">“Spirit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25">Keith Gibson</text:p>
          </table:table-cell>
          <table:table-cell table:style-name="Table2.A2" office:value-type="string">
            <text:p text:style-name="P125">Old printed Bible</text:p>
            <text:p text:style-name="P125">Thomas Nelson 1970 Holy Bible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6">Exo 23:23</text:p>
                <text:list>
                  <text:list-item>
                    <text:p text:style-name="P126">“Angel”</text:p>
                  </text:list-item>
                  <text:list-item>
                    <text:p text:style-name="P126">No extra “and”</text:p>
                  </text:list-item>
                </text:list>
              </text:list-item>
              <text:list-item>
                <text:p text:style-name="P127">1 John 5:8</text:p>
                <text:list>
                  <text:list-item>
                    <text:p text:style-name="P127">“spirit”</text:p>
                  </text:list-item>
                </text:list>
              </text:list-item>
              <text:list-item>
                <text:p text:style-name="P127">Acts 11:28</text:p>
                <text:list>
                  <text:list-item>
                    <text:p text:style-name="P127">“<text:span text:style-name="T22">s</text:span>pirit”</text:p>
                  </text:list-item>
                </text:list>
              </text:list-item>
              <text:list-item>
                <text:p text:style-name="P128">Acts 21:4</text:p>
                <text:list>
                  <text:list-item>
                    <text:p text:style-name="P128">“Spirit”</text:p>
                  </text:list-item>
                </text:list>
              </text:list-item>
              <text:list-item>
                <text:p text:style-name="P129">Matthew 4:1, <text:span text:style-name="T53">Mark 1:</text:span><text:span text:style-name="T54">1</text:span><text:span text:style-name="T53">2</text:span></text:p>
                <text:list>
                  <text:list-item>
                    <text:p text:style-name="P129">“<text:span text:style-name="T22">s</text:span>pirit”</text:p>
                  </text:list-item>
                </text:list>
              </text:list-item>
              <text:list-item>
                <text:p text:style-name="P130">Luke 4:1</text:p>
                <text:list>
                  <text:list-item>
                    <text:p text:style-name="P130">“Spirit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31">Holy-bible.online</text:p>
          </table:table-cell>
          <table:table-cell table:style-name="Table2.A2" office:value-type="string">
            <text:p text:style-name="P131">KJV</text:p>
          </table:table-cell>
          <table:table-cell table:style-name="Table2.C2" office:value-type="string">
            <text:list text:continue-numbering="true" text:style-name="L3">
              <text:list-item>
                <text:p text:style-name="P132">Jos 19:19</text:p>
                <text:list>
                  <text:list-item>
                    <text:p text:style-name="P132">“Haphraim”</text:p>
                  </text:list-item>
                </text:list>
              </text:list-item>
              <text:list-item>
                <text:p text:style-name="P133">1Sa 6:9</text:p>
                <text:list>
                  <text:list-item>
                    <text:p text:style-name="P133">“his hand that smote us<text:span text:style-name="T22">:</text:span>”</text:p>
                  </text:list-item>
                </text:list>
              </text:list-item>
              <text:list-item>
                <text:p text:style-name="P134">1Ch 2:47</text:p>
                <text:list>
                  <text:list-item>
                    <text:p text:style-name="P134">“Gesham”</text:p>
                  </text:list-item>
                </text:list>
              </text:list-item>
              <text:list-item>
                <text:p text:style-name="P135">1Ch 2:49</text:p>
                <text:list>
                  <text:list-item>
                    <text:p text:style-name="P135">“Achsa”</text:p>
                  </text:list-item>
                </text:list>
              </text:list-item>
              <text:list-item>
                <text:p text:style-name="P136">1Ch 7:19 <text:span text:style-name="T55">(Num 26:32, </text:span><text:span text:style-name="T56">Jos 17:2</text:span><text:span text:style-name="T55">: Shemida</text:span><text:span text:style-name="T56">)</text:span></text:p>
                <text:list>
                  <text:list-item>
                    <text:p text:style-name="P136">“Shemidah”</text:p>
                  </text:list-item>
                </text:list>
              </text:list-item>
              <text:list-item>
                <text:p text:style-name="P137">2Ch 2:16 <text:span text:style-name="T57">(1Ki 5:9: floats)</text:span></text:p>
                <text:list>
                  <text:list-item>
                    <text:p text:style-name="P137">“flotes”</text:p>
                  </text:list-item>
                </text:list>
              </text:list-item>
              <text:list-item>
                <text:p text:style-name="P138">Jer 2:22, <text:span text:style-name="T58">Mal 3:2</text:span></text:p>
                <text:list>
                  <text:list-item>
                    <text:p text:style-name="P139">“sope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0">E-Sword app</text:p>
          </table:table-cell>
          <table:table-cell table:style-name="Table2.A2" office:value-type="string">
            <text:p text:style-name="P140">Included KJV</text:p>
            <text:p text:style-name="P140">King James Version</text:p>
            <text:p text:style-name="P140">This is the 1769 King James Version of the Holy Bible (also known as the Authorized Version).</text:p>
            <text:p text:style-name="P140">Published in 1769; public domain.</text:p>
          </table:table-cell>
          <table:table-cell table:style-name="Table2.C2" office:value-type="string">
            <text:list text:continue-numbering="true" text:style-name="L3">
              <text:list-item>
                <text:p text:style-name="P141">1Sa 6:9</text:p>
                <text:list>
                  <text:list-item>
                    <text:p text:style-name="P141">“Bethshemesh”</text:p>
                  </text:list-item>
                  <text:list-item>
                    <text:p text:style-name="P141">“that smote us<text:span text:style-name="T22">:</text:span>”</text:p>
                  </text:list-item>
                </text:list>
              </text:list-item>
              <text:list-item>
                <text:p text:style-name="P142">Rom 4:18</text:p>
                <text:list>
                  <text:list-item>
                    <text:p text:style-name="P142">“<text:span text:style-name="T59">many nations</text:span><text:span text:style-name="T60">,</text:span><text:span text:style-name="T59">”</text:span></text:p>
                  </text:list-item>
                </text:list>
              </text:list-item>
              <text:list-item>
                <text:p text:style-name="P143">Almost exactly the same as Bibleanalyzer av1769</text:p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4">Ccel.org</text:p>
          </table:table-cell>
          <table:table-cell table:style-name="Table2.A2" office:value-type="string">
            <text:p text:style-name="P144">HOLY BIBLE</text:p>
            <text:p text:style-name="P144">King James Version</text:p>
            <text:p text:style-name="P145">PDF</text:p>
          </table:table-cell>
          <table:table-cell table:style-name="Table2.C2" office:value-type="string">
            <text:list text:continue-numbering="true" text:style-name="L3">
              <text:list-item>
                <text:p text:style-name="P146">Very large amount of spelling, punctuation, and formatting changes.</text:p>
              </text:list-item>
              <text:list-item>
                <text:p text:style-name="P147">Numerous word changes (that don’t seem to make any sense. <text:span text:style-name="T61">Bad scan?</text:span>)</text:p>
              </text:list-item>
              <text:list-item>
                <text:p text:style-name="P148">Genesis 26:18</text:p>
                <text:list>
                  <text:list-item>
                    <text:p text:style-name="P148">“<text:span text:style-name="T62">p</text:span><text:span text:style-name="T63">hilistines”</text:span></text:p>
                  </text:list-item>
                </text:list>
              </text:list-item>
              <text:list-item>
                <text:p text:style-name="P149">Gen 30:3</text:p>
                <text:list>
                  <text:list-item>
                    <text:p text:style-name="P149">“and she shall bear upon my knees that” <text:span text:style-name="T64">instead of “and she shall bear upon my knees</text:span><text:span text:style-name="T65">,</text:span><text:span text:style-name="T64"> that”</text:span></text:p>
                  </text:list-item>
                </text:list>
              </text:list-item>
              <text:list-item>
                <text:p text:style-name="P150">2Ki 5:15</text:p>
                <text:list>
                  <text:list-item>
                    <text:p text:style-name="P150">“there is no God in earth, but in Israel:” <text:span text:style-name="T66">instead of “there is no God in </text:span><text:span text:style-name="T67">all the</text:span><text:span text:style-name="T66"> earth, but in Israel:”</text:span></text:p>
                  </text:list-item>
                </text:list>
              </text:list-item>
              <text:list-item>
                <text:p text:style-name="P151">1Ch 7:9</text:p>
                <text:list>
                  <text:list-item>
                    <text:p text:style-name="P151">“heads of the house of <text:span text:style-name="T22">the</text:span> fathers,” <text:span text:style-name="T68">instead of “heads of the house of </text:span><text:span text:style-name="T69">their</text:span><text:span text:style-name="T68"> fathers,”</text:span></text:p>
                  </text:list-item>
                </text:list>
              </text:list-item>
              <text:list-item>
                <text:p text:style-name="P152">1Ch 11:11</text:p>
                <text:list>
                  <text:list-item>
                    <text:p text:style-name="P152">“<text:span text:style-name="T22">and</text:span> Hachmonite,” <text:span text:style-name="T70">instead of “</text:span><text:span text:style-name="T71">an</text:span><text:span text:style-name="T70"> Hachmonite,”</text:span></text:p>
                  </text:list-item>
                </text:list>
              </text:list-item>
              <text:list-item>
                <text:p text:style-name="P153">1Ch 12:6</text:p>
                <text:list>
                  <text:list-item>
                    <text:p text:style-name="P153">“<text:span text:style-name="T22">Pr</text:span>Azareel” <text:span text:style-name="T72">instead of “Azareel”</text:span></text:p>
                  </text:list-item>
                  <text:list-item>
                    <text:p text:style-name="P154">This word change appears at least <text:span text:style-name="T73">4</text:span> times</text:p>
                  </text:list-item>
                </text:list>
              </text:list-item>
              <text:list-item>
                <text:p text:style-name="P155">2Sa 8:16</text:p>
                <text:list>
                  <text:list-item>
                    <text:p text:style-name="P155">“And Joab the son Zeruiah” instead of “And Joab the son <text:span text:style-name="T22">of</text:span> Zeruiah”</text:p>
                  </text:list-item>
                </text:list>
              </text:list-item>
              <text:list-item>
                <text:p text:style-name="P156">2Ch 2:16</text:p>
                <text:list>
                  <text:list-item>
                    <text:p text:style-name="P156">“flotes” and “thou <text:span text:style-name="T22">shall</text:span> carry” (instead of shalt)</text:p>
                  </text:list-item>
                </text:list>
              </text:list-item>
              <text:list-item>
                <text:p text:style-name="P157">Ezra 8:15</text:p>
                <text:list>
                  <text:list-item>
                    <text:p text:style-name="P157">“the river <text:span text:style-name="T22">than</text:span> runneth to Ahava;” <text:span text:style-name="T74">instead of “the river </text:span><text:span text:style-name="T75">that</text:span><text:span text:style-name="T74"> runneth to Ahava;”</text:span></text:p>
                  </text:list-item>
                </text:list>
              </text:list-item>
              <text:list-item>
                <text:p text:style-name="P158">Neh 3:14</text:p>
                <text:list>
                  <text:list-item>
                    <text:p text:style-name="P158">“part of Beth-haccerem; he <text:span text:style-name="T22">build</text:span> it,” <text:span text:style-name="T76">instead of “part of Bethhaccerem; he </text:span><text:span text:style-name="T77">built</text:span><text:span text:style-name="T76"> it,”</text:span></text:p>
                  </text:list-item>
                </text:list>
              </text:list-item>
              <text:list-item>
                <text:p text:style-name="P159">Several “O” changed to “Oh”</text:p>
              </text:list-item>
              <text:list-item>
                <text:p text:style-name="P160">Job 30:6</text:p>
                <text:list>
                  <text:list-item>
                    <text:p text:style-name="P160">“cliffs” instead of “clifts”</text:p>
                  </text:list-item>
                </text:list>
              </text:list-item>
              <text:list-item>
                <text:p text:style-name="P161">Psa 17:4</text:p>
                <text:list>
                  <text:list-item>
                    <text:p text:style-name="P161">“Concerning the wor<text:span text:style-name="T22">d</text:span>s of men,” instead of “Concerning the wor<text:span text:style-name="T22">k</text:span>s of men,”</text:p>
                  </text:list-item>
                </text:list>
              </text:list-item>
              <text:list-item>
                <text:p text:style-name="P162">Pro 6:3</text:p>
                <text:list>
                  <text:list-item>
                    <text:p text:style-name="P162">“Do this now, my son, deliver thyself,” instead of “Do this now, my son, <text:span text:style-name="T22">and</text:span> deliver thyself,”</text:p>
                  </text:list-item>
                </text:list>
              </text:list-item>
              <text:list-item>
                <text:p text:style-name="P163">Jer 32:5</text:p>
                <text:list>
                  <text:list-item>
                    <text:p text:style-name="P163">“?” at the end instead of “.”</text:p>
                  </text:list-item>
                </text:list>
              </text:list-item>
              <text:list-item>
                <text:p text:style-name="P164">Jer 2:22, Mal 3:2</text:p>
                <text:list>
                  <text:list-item>
                    <text:p text:style-name="P165">“<text:span text:style-name="T78">sope” instead of “soap” (2x)</text:span></text:p>
                  </text:list-item>
                </text:list>
              </text:list-item>
              <text:list-item>
                <text:p text:style-name="P166">Jer 33:5</text:p>
                <text:list>
                  <text:list-item>
                    <text:p text:style-name="P166">“but it is fill them with the dead bodies of men,” <text:span text:style-name="T79">instead of “but it is </text:span><text:span text:style-name="T80">to</text:span><text:span text:style-name="T79"> fill them with the dead bodies of men,”</text:span></text:p>
                  </text:list-item>
                </text:list>
              </text:list-item>
              <text:list-item>
                <text:p text:style-name="P167">Jer 36:2</text:p>
                <text:list>
                  <text:list-item>
                    <text:p text:style-name="P167">“even <text:span text:style-name="T22">into</text:span> this day.” <text:span text:style-name="T81">instead of “even </text:span><text:span text:style-name="T82">unto</text:span><text:span text:style-name="T81"> this day.”</text:span></text:p>
                  </text:list-item>
                </text:list>
              </text:list-item>
              <text:list-item>
                <text:p text:style-name="P168">Acts 11:12,<text:span text:style-name="T83">28, 1John 5:8</text:span></text:p>
                <text:list>
                  <text:list-item>
                    <text:p text:style-name="P168">“<text:span text:style-name="T84">s</text:span><text:span text:style-name="T85">pirit”</text:span></text:p>
                  </text:list-item>
                </text:list>
              </text:list-item>
              <text:list-item>
                <text:p text:style-name="P169">Rev 2:6,15</text:p>
                <text:list>
                  <text:list-item>
                    <text:p text:style-name="P170">“<text:span text:style-name="T86">Nicolaitanes” instead of “Nicolaitans”</text:span></text:p>
                  </text:list-item>
                </text:list>
              </text:list-item>
              <text:list-item>
                <text:p text:style-name="P171">Rev 19:16</text:p>
                <text:list>
                  <text:list-item>
                    <text:p text:style-name="P171">“King of Kings, and Lord of Lords.” instead of “KING OF KINGS, AND LORD OF LORDS.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72">Archive.org</text:p>
          </table:table-cell>
          <table:table-cell table:style-name="Table2.A2" office:value-type="string">
            <text:p text:style-name="P172">KJV 1769 Oxford edition</text:p>
            <text:p text:style-name="P172">PDF scan of the printed book</text:p>
          </table:table-cell>
          <table:table-cell table:style-name="Table2.C2" office:value-type="string">
            <text:list text:continue-numbering="true" text:style-name="L3">
              <text:list-item>
                <text:p text:style-name="P173">Exodus 23:23</text:p>
                <text:list>
                  <text:list-item>
                    <text:p text:style-name="P173"><text:span text:style-name="T87">Capital “A”, </text:span>No extra “and”</text:p>
                  </text:list-item>
                </text:list>
              </text:list-item>
              <text:list-item>
                <text:p text:style-name="P174">Matthew 4:1</text:p>
                <text:list>
                  <text:list-item>
                    <text:p text:style-name="P175">“spirit”</text:p>
                  </text:list-item>
                  <text:list-item>
                    <text:p text:style-name="P175"><draw:frame draw:style-name="fr1" draw:name="Image2" text:anchor-type="as-char" svg:width="6.2063in" svg:height="1.0693in" draw:z-index="1"><draw:image xlink:href="Pictures/10000001000002A100000074D348DFDF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6">Mark 1:12</text:p>
                <text:list>
                  <text:list-item>
                    <text:p text:style-name="P176">“spirit”</text:p>
                  </text:list-item>
                  <text:list-item>
                    <text:p text:style-name="P176"><draw:frame draw:style-name="fr1" draw:name="Image1" text:anchor-type="as-char" svg:width="4.9583in" svg:height="0.552in" draw:z-index="0"><draw:image xlink:href="Pictures/10000001000001DC00000035A533AD63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7">Luke 4:1</text:p>
                <text:list>
                  <text:list-item>
                    <text:p text:style-name="P177">“Spirit”</text:p>
                  </text:list-item>
                  <text:list-item>
                    <text:p text:style-name="P177"><draw:frame draw:style-name="fr1" draw:name="Image4" text:anchor-type="as-char" svg:width="5.011in" svg:height="0.9165in" draw:z-index="3"><draw:image xlink:href="Pictures/10000001000001E1000000589875A2D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12</text:p>
                <text:list>
                  <text:list-item>
                    <text:p text:style-name="P178">“spirit”</text:p>
                  </text:list-item>
                  <text:list-item>
                    <text:p text:style-name="P178"><draw:frame draw:style-name="fr1" draw:name="Image5" text:anchor-type="as-char" svg:width="4.552in" svg:height="1.0102in" draw:z-index="4"><draw:image xlink:href="Pictures/10000001000001B5000000616993DC1A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28</text:p>
                <text:list>
                  <text:list-item>
                    <text:p text:style-name="P178">“<text:span text:style-name="T88">spirit</text:span>”</text:p>
                  </text:list-item>
                  <text:list-item>
                    <text:p text:style-name="P178"><draw:frame draw:style-name="fr1" draw:name="Image6" text:anchor-type="as-char" svg:width="4.5425in" svg:height="0.802in" draw:z-index="5"><draw:image xlink:href="Pictures/10000001000001B40000004D9F22698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4">1 John 5:8</text:p>
                <text:list>
                  <text:list-item>
                    <text:p text:style-name="P174">“spirit”</text:p>
                  </text:list-item>
                </text:list>
              </text:list-item>
            </text:list>
            <text:p text:style-name="P179"/>
            <text:p text:style-name="P180">They didn’t have any problem printing a capital “S” in Mat 4:3 so Mat 4:1, Mar 1:12, <text:span text:style-name="T89">and </text:span>1 John 5:8 were intentional:</text:p>
            <text:p text:style-name="P181"><draw:frame draw:style-name="fr1" draw:name="Image3" text:anchor-type="as-char" svg:width="5.4382in" svg:height="1.0209in" draw:z-index="2"><draw:image xlink:href="Pictures/100000010000020A00000062DC5EE227.png" xlink:type="simple" xlink:show="embed" xlink:actuate="onLoad" draw:mime-type="image/png"/></draw:frame></text:p>
          </table:table-cell>
        </table:table-row>
        <table:table-row table:style-name="Table2.14">
          <table:table-cell table:style-name="Table2.A2" office:value-type="string">
            <text:p text:style-name="P182">Archive.org</text:p>
          </table:table-cell>
          <table:table-cell table:style-name="Table2.A2" office:value-type="string">
            <text:p text:style-name="P182">KJV 1611 First edition</text:p>
          </table:table-cell>
          <table:table-cell table:style-name="Table2.C2" office:value-type="string">
            <text:list text:style-name="L4">
              <text:list-item>
                <text:p text:style-name="P183">Exodus 23:23</text:p>
                <text:list>
                  <text:list-item>
                    <text:p text:style-name="P183">Capital “A”, no extra “and”</text:p>
                  </text:list-item>
                  <text:list-item>
                    <text:p text:style-name="P183"><draw:frame draw:style-name="fr1" draw:name="Image7" text:anchor-type="as-char" svg:width="5.6571in" svg:height="2.2083in" draw:z-index="6"><draw:image xlink:href="Pictures/100000010000021F000000D495315DAD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4">Mat 4:1</text:p>
                <text:list>
                  <text:list-item>
                    <text:p text:style-name="P185">“Spirit”</text:p>
                  </text:list-item>
                </text:list>
              </text:list-item>
              <text:list-item>
                <text:p text:style-name="P185">Mat 4:3</text:p>
                <text:list>
                  <text:list-item>
                    <text:p text:style-name="P185">“sonne of God”</text:p>
                  </text:list-item>
                  <text:list-item>
                    <text:p text:style-name="P185"><draw:frame draw:style-name="fr1" draw:name="Image8" text:anchor-type="as-char" svg:width="4.761in" svg:height="3.428in" draw:z-index="7"><draw:image xlink:href="Pictures/10000001000001C9000001496F940DE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6">Mark 1:12</text:p>
                <text:list>
                  <text:list-item>
                    <text:p text:style-name="P186">“Spirit”</text:p>
                  </text:list-item>
                  <text:list-item>
                    <text:p text:style-name="P186"><draw:frame draw:style-name="fr1" draw:name="Image9" text:anchor-type="as-char" svg:width="4.8654in" svg:height="0.6146in" draw:z-index="8"><draw:image xlink:href="Pictures/10000001000001D30000003B4DDFF5EC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7">Luke 4:1</text:p>
                <text:list>
                  <text:list-item>
                    <text:p text:style-name="P187">“spirit”</text:p>
                  </text:list-item>
                  <text:list-item>
                    <text:p text:style-name="P187"><draw:frame draw:style-name="fr1" draw:name="Image10" text:anchor-type="as-char" svg:width="5.1673in" svg:height="1.6665in" draw:z-index="9"><draw:image xlink:href="Pictures/10000001000001F0000000A01F494E8B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8">Acts 11:12</text:p>
                <text:list>
                  <text:list-item>
                    <text:p text:style-name="P188">“spirit”</text:p>
                  </text:list-item>
                  <text:list-item>
                    <text:p text:style-name="P188"><draw:frame draw:style-name="fr1" draw:name="Image11" text:anchor-type="as-char" svg:width="5.3862in" svg:height="1.4791in" draw:z-index="10"><draw:image xlink:href="Pictures/10000001000002050000008EEB47175C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9">Acts 11:28</text:p>
                <text:list>
                  <text:list-item>
                    <text:p text:style-name="P189">“<text:span text:style-name="T90">spirit”</text:span></text:p>
                  </text:list-item>
                  <text:list-item>
                    <text:p text:style-name="P189"><draw:frame draw:style-name="fr1" draw:name="Image12" text:anchor-type="as-char" svg:width="5.7717in" svg:height="2.2398in" draw:z-index="11"><draw:image xlink:href="Pictures/100000010000022A000000D7E9BF5AF2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0">1 John 5:8</text:p>
                <text:list>
                  <text:list-item>
                    <text:p text:style-name="P190">“<text:span text:style-name="T91">Spirit”</text:span></text:p>
                  </text:list-item>
                  <text:list-item>
                    <text:p text:style-name="P190"><draw:frame draw:style-name="fr1" draw:name="Image13" text:anchor-type="as-char" svg:width="4.4799in" svg:height="1.1772in" draw:z-index="12"><draw:image xlink:href="Pictures/10000001000001AE000000719E2E2CA8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1">Archive.org</text:p>
          </table:table-cell>
          <table:table-cell table:style-name="Table2.A2" office:value-type="string">
            <text:p text:style-name="P191">The Bible</text:p>
            <text:p text:style-name="P191">Imprinted at London by Robert Barker, Printer to the Kings most excellent majesty</text:p>
            <text:p text:style-name="P191">1616</text:p>
          </table:table-cell>
          <table:table-cell table:style-name="Table2.C2" office:value-type="string">
            <text:list text:continue-numbering="true" text:style-name="L4">
              <text:list-item>
                <text:p text:style-name="P192">Exodus 23:23</text:p>
                <text:list>
                  <text:list-item>
                    <text:p text:style-name="P192">Capital “A”, no extra “and”, “in” removed <text:span text:style-name="T92">from before “unto”</text:span></text:p>
                  </text:list-item>
                  <text:list-item>
                    <text:p text:style-name="P192"><draw:frame draw:style-name="fr1" draw:name="Image14" text:anchor-type="as-char" svg:width="5.8965in" svg:height="1.7602in" draw:z-index="13"><draw:image xlink:href="Pictures/1000000100000236000000A989C74D7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3">Matthew 4:1</text:p>
                <text:list>
                  <text:list-item>
                    <text:p text:style-name="P193">“Spirit”</text:p>
                  </text:list-item>
                </text:list>
              </text:list-item>
              <text:list-item>
                <text:p text:style-name="P193">Matthew 4:3</text:p>
                <text:list>
                  <text:list-item>
                    <text:p text:style-name="P193">“Sonne of God”</text:p>
                  </text:list-item>
                  <text:list-item>
                    <text:p text:style-name="P193"><draw:frame draw:style-name="fr1" draw:name="Image15" text:anchor-type="as-char" svg:width="5.6673in" svg:height="2.698in" draw:z-index="14"><draw:image xlink:href="Pictures/1000000100000220000001030F103BA8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4">Mark 1:12</text:p>
                <text:list>
                  <text:list-item>
                    <text:p text:style-name="P194">“spirit”</text:p>
                  </text:list-item>
                  <text:list-item>
                    <text:p text:style-name="P194"><draw:frame draw:style-name="fr1" draw:name="Image16" text:anchor-type="as-char" svg:width="5.8028in" svg:height="0.8437in" draw:z-index="15"><draw:image xlink:href="Pictures/100000010000022D00000051A1F8737D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5">Luke 4:1</text:p>
                <text:list>
                  <text:list-item>
                    <text:p text:style-name="P195">“<text:span text:style-name="T93">Spirit”</text:span></text:p>
                  </text:list-item>
                  <text:list-item>
                    <text:p text:style-name="P195"><draw:frame draw:style-name="fr1" draw:name="Image17" text:anchor-type="as-char" svg:width="6.2402in" svg:height="1.3854in" draw:z-index="16"><draw:image xlink:href="Pictures/100000010000025700000085131BF35A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6">Acts 11:12</text:p>
                <text:list>
                  <text:list-item>
                    <text:p text:style-name="P196">“<text:span text:style-name="T94">Spirit”</text:span></text:p>
                  </text:list-item>
                  <text:list-item>
                    <text:p text:style-name="P196"><draw:frame draw:style-name="fr1" draw:name="Image18" text:anchor-type="as-char" svg:width="4.5008in" svg:height="0.4791in" draw:z-index="17"><draw:image xlink:href="Pictures/10000001000001B00000002E952FAEF0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7">Acts 11:28</text:p>
                <text:list>
                  <text:list-item>
                    <text:p text:style-name="P197">“<text:span text:style-name="T95">Spirit”</text:span></text:p>
                  </text:list-item>
                  <text:list-item>
                    <text:p text:style-name="P197"><draw:frame draw:style-name="fr1" draw:name="Image19" text:anchor-type="as-char" svg:width="4.5937in" svg:height="1.4898in" draw:z-index="18"><draw:image xlink:href="Pictures/10000001000001B90000008F17446E0E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8">1 John 5:8</text:p>
                <text:list>
                  <text:list-item>
                    <text:p text:style-name="P198">“spirit”</text:p>
                  </text:list-item>
                  <text:list-item>
                    <text:p text:style-name="P198"><draw:frame draw:style-name="fr1" draw:name="Image20" text:anchor-type="as-char" svg:width="4.4165in" svg:height="0.9272in" draw:z-index="19"><draw:image xlink:href="Pictures/10000001000001A800000059F80CBAC7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9">Jireh Independent Baptist Church</text:p>
          </table:table-cell>
          <table:table-cell table:style-name="Table2.A2" office:value-type="string">
            <text:p text:style-name="P199">Printed Bible</text:p>
            <text:p text:style-name="P199">Collins world</text:p>
            <text:p text:style-name="P199">“Authorised King James Version”</text:p>
            <text:p text:style-name="P200">printed in Great Britain</text:p>
          </table:table-cell>
          <table:table-cell table:style-name="Table2.C2" office:value-type="string">
            <text:list text:continue-numbering="true" text:style-name="L4">
              <text:list-item>
                <text:p text:style-name="P201">Exo 23:23</text:p>
                <text:list>
                  <text:list-item>
                    <text:p text:style-name="P201">extra “and”</text:p>
                  </text:list-item>
                </text:list>
              </text:list-item>
              <text:list-item>
                <text:p text:style-name="P201">1Jno 5:8</text:p>
                <text:list>
                  <text:list-item>
                    <text:p text:style-name="P201">“spirit”</text:p>
                  </text:list-item>
                </text:list>
              </text:list-item>
            </text:list>
          </table:table-cell>
        </table:table-row>
      </table:table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2">No extra “and” <text:span text:style-name="T96">in Exo 23:23</text:span></text:p>
          </table:table-cell>
          <table:table-cell table:style-name="Table1.B1" office:value-type="string">
            <text:p text:style-name="P202">Extra “and” <text:span text:style-name="T96">in Exo 23:23 </text:span><text:span text:style-name="T97">(PCE)</text:span></text:p>
          </table:table-cell>
        </table:table-row>
        <table:table-row>
          <table:table-cell table:style-name="Table1.A2" office:value-type="string">
            <text:p text:style-name="P203">Exodus 23:23</text:p>
            <text:p text:style-name="P204">For mine Angel shall go before thee, and bring thee in unto the Amorites, and the Hittites, and the Perizzites, and the Canaanites,<text:span text:style-name="T22"> </text:span>the Hivites, and the Jebusites: and I will cut them off.</text:p>
          </table:table-cell>
          <table:table-cell table:style-name="Table1.B2" office:value-type="string">
            <text:p text:style-name="P203">Exodus 23:23</text:p>
            <text:p text:style-name="P204">For mine Angel shall go before thee, and bring thee in unto the Amorites, and the Hittites, and the Perizzites, and the Canaanites, <text:span text:style-name="T22">and</text:span> the Hivites, and the Jebusites: and I will cut them off.</text:p>
          </table:table-cell>
        </table:table-row>
        <table:table-row>
          <table:table-cell table:style-name="Table1.A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.</text:span></text:p>
          </table:table-cell>
          <table:table-cell table:style-name="Table1.B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?</text:span></text:p>
          </table:table-cell>
        </table:table-row>
        <table:table-row>
          <table:table-cell table:style-name="Table1.A2" office:value-type="string">
            <text:p text:style-name="P207">Mark 2:1</text:p>
            <text:p text:style-name="P208">And again he entered into Capernaum<text:span text:style-name="T22"> </text:span>after some days; and it was noised that he was in the house.</text:p>
          </table:table-cell>
          <table:table-cell table:style-name="Table1.B2" office:value-type="string">
            <text:p text:style-name="P207">Mark 2:1</text:p>
            <text:p text:style-name="P208">And again he entered into Capernaum<text:span text:style-name="T22">,</text:span> after some days; and it was noised that he was in the house.</text:p>
          </table:table-cell>
        </table:table-row>
        <table:table-row>
          <table:table-cell table:style-name="Table1.A2" office:value-type="string">
            <text:p text:style-name="P209">Acts 11:12</text:p>
            <text:p text:style-name="P210">And the <text:span text:style-name="T22">S</text:span>pirit bade me go with them, nothing doubting. Moreover these six brethren accompanied me, and we entered into the man’s house:</text:p>
          </table:table-cell>
          <table:table-cell table:style-name="Table1.B2" office:value-type="string">
            <text:p text:style-name="P211">Acts 11:12</text:p>
            <text:p text:style-name="P212">And the <text:span text:style-name="T22">s</text:span>pirit bade me go with them, nothing doubting. Moreover these six brethren accompanied me, and we entered into the man’s house:</text:p>
          </table:table-cell>
        </table:table-row>
        <table:table-row>
          <table:table-cell table:style-name="Table1.A2" office:value-type="string">
            <text:p text:style-name="P213">Acts 11:28</text:p>
            <text:p text:style-name="P214">And there stood up one of them named Agabus, and signified by the <text:span text:style-name="T22">S</text:span>pirit that there should be great dearth throughout all the world: which came to pass in the days of Claudius Cæsar.</text:p>
          </table:table-cell>
          <table:table-cell table:style-name="Table1.B2" office:value-type="string">
            <text:p text:style-name="P215">Acts 11:28</text:p>
            <text:p text:style-name="P216">And there stood up one of them named Agabus, and signified by the <text:span text:style-name="T22">s</text:span>pirit that there should be great dearth throughout all the world: which came to pass in the days of Claudius Cæsar.</text:p>
          </table:table-cell>
        </table:table-row>
        <table:table-row>
          <table:table-cell table:style-name="Table1.A2" office:value-type="string">
            <text:p text:style-name="P217">1 Corinthians 15:27</text:p>
            <text:p text:style-name="P218">For he hath put all things under his feet. But when he saith<text:span text:style-name="T22"> </text:span>all things are put under him, it is manifest that he is excepted, which did put all things under him.</text:p>
          </table:table-cell>
          <table:table-cell table:style-name="Table1.B2" office:value-type="string">
            <text:p text:style-name="P217">1 Corinthians 15:27</text:p>
            <text:p text:style-name="P219">For he hath put all things under his feet. But when he saith<text:span text:style-name="T22">,</text:span> all things are put under him, it is manifest that he is excepted, which did put all things under him.</text:p>
          </table:table-cell>
        </table:table-row>
        <table:table-row>
          <table:table-cell table:style-name="Table1.A2" office:value-type="string">
            <text:p text:style-name="P220">1 John 5:8</text:p>
            <text:p text:style-name="P221">And there are three that bear witness in earth, the <text:span text:style-name="T22">S</text:span>pirit, and the water, and the blood: and these three agree in one.</text:p>
          </table:table-cell>
          <table:table-cell table:style-name="Table1.B2" office:value-type="string">
            <text:p text:style-name="P220">1 John 5:8</text:p>
            <text:p text:style-name="P222">And there are three that bear witness in earth, the <text:span text:style-name="T22">s</text:span>pirit, and the water, and the blood: and these three agree in one. 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23">Verse</text:p>
          </table:table-cell>
          <table:table-cell table:style-name="Table3.A1" office:value-type="string">
            <text:p text:style-name="P224">Bibleanalyzer</text:p>
            <text:p text:style-name="P224">av1769</text:p>
          </table:table-cell>
          <table:table-cell table:style-name="Table3.A1" office:value-type="string">
            <text:p text:style-name="P224">Archive.org</text:p>
            <text:p text:style-name="P224">KJV</text:p>
          </table:table-cell>
          <table:table-cell table:style-name="Table3.A1" office:value-type="string">
            <text:p text:style-name="P225">Holy Bible King James version (printed)</text:p>
            <text:p text:style-name="P225">Christian Art Publishers</text:p>
          </table:table-cell>
          <table:table-cell table:style-name="Table3.E1" office:value-type="string">
            <text:p text:style-name="P226">The Holy Bible (printed)</text:p>
            <text:p text:style-name="P226">Authorized (King James) Version</text:p>
            <text:p text:style-name="P226">Gideons International 1974 edition</text:p>
          </table:table-cell>
        </table:table-row>
        <table:table-row>
          <table:table-cell table:style-name="Table3.A2" office:value-type="string">
            <text:p text:style-name="P227">Joshua 19:19</text:p>
          </table:table-cell>
          <table:table-cell table:style-name="Table3.A2" office:value-type="string">
            <text:p text:style-name="P228">Hapharaim</text:p>
          </table:table-cell>
          <table:table-cell table:style-name="Table3.A2" office:value-type="string">
            <text:p text:style-name="P229">Haphraim</text:p>
          </table:table-cell>
          <table:table-cell table:style-name="Table3.A2" office:value-type="string">
            <text:p text:style-name="P230">Hapharaim</text:p>
          </table:table-cell>
          <table:table-cell table:style-name="Table3.E2" office:value-type="string">
            <text:p text:style-name="P231"><text:span text:style-name="T98">Haph-r</text:span>á-<text:span text:style-name="T98">im</text:span></text:p>
          </table:table-cell>
        </table:table-row>
        <table:table-row>
          <table:table-cell table:style-name="Table3.A2" office:value-type="string">
            <text:p text:style-name="P232">1Ch 2:47</text:p>
          </table:table-cell>
          <table:table-cell table:style-name="Table3.A2" office:value-type="string">
            <text:p text:style-name="Table_20_Contents">Geshan</text:p>
          </table:table-cell>
          <table:table-cell table:style-name="Table3.A2" office:value-type="string">
            <text:p text:style-name="Table_20_Contents">Gesham</text:p>
          </table:table-cell>
          <table:table-cell table:style-name="Table3.A2" office:value-type="string">
            <text:p text:style-name="P233">Geshan</text:p>
          </table:table-cell>
          <table:table-cell table:style-name="Table3.E2" office:value-type="string">
            <text:p text:style-name="P234">Gé-sham</text:p>
          </table:table-cell>
        </table:table-row>
        <table:table-row>
          <table:table-cell table:style-name="Table3.A2" office:value-type="string">
            <text:p text:style-name="P235">1Ch 2:49</text:p>
          </table:table-cell>
          <table:table-cell table:style-name="Table3.A2" office:value-type="string">
            <text:p text:style-name="P236">Achsah</text:p>
          </table:table-cell>
          <table:table-cell table:style-name="Table3.A2" office:value-type="string">
            <text:p text:style-name="P236">Achsa</text:p>
          </table:table-cell>
          <table:table-cell table:style-name="Table3.A2" office:value-type="string">
            <text:p text:style-name="P237">Achsah</text:p>
          </table:table-cell>
          <table:table-cell table:style-name="Table3.E2" office:value-type="string">
            <text:p text:style-name="P238">Ach́-sa</text:p>
          </table:table-cell>
        </table:table-row>
        <table:table-row>
          <table:table-cell table:style-name="Table3.A2" office:value-type="string">
            <text:p text:style-name="P239">1Ch 7:19</text:p>
          </table:table-cell>
          <table:table-cell table:style-name="Table3.A2" office:value-type="string">
            <text:p text:style-name="P239">Shemida</text:p>
          </table:table-cell>
          <table:table-cell table:style-name="Table3.A2" office:value-type="string">
            <text:p text:style-name="P239">Shemidah</text:p>
          </table:table-cell>
          <table:table-cell table:style-name="Table3.A2" office:value-type="string">
            <text:p text:style-name="P240">Shemida</text:p>
          </table:table-cell>
          <table:table-cell table:style-name="Table3.E2" office:value-type="string">
            <text:p text:style-name="P241"><text:span text:style-name="T99">She-m</text:span>Í<text:span text:style-name="T99">-dah</text:span></text:p>
          </table:table-cell>
        </table:table-row>
        <table:table-row>
          <table:table-cell table:style-name="Table3.A2" office:value-type="string">
            <text:p text:style-name="P242">2Ch 2:16</text:p>
          </table:table-cell>
          <table:table-cell table:style-name="Table3.A2" office:value-type="string">
            <text:p text:style-name="P243">floats</text:p>
          </table:table-cell>
          <table:table-cell table:style-name="Table3.A2" office:value-type="string">
            <text:p text:style-name="P244">flotes</text:p>
          </table:table-cell>
          <table:table-cell table:style-name="Table3.A2" office:value-type="string">
            <text:p text:style-name="P245">floats</text:p>
          </table:table-cell>
          <table:table-cell table:style-name="Table3.E2" office:value-type="string">
            <text:p text:style-name="P246">flotes</text:p>
          </table:table-cell>
        </table:table-row>
        <table:table-row>
          <table:table-cell table:style-name="Table3.A2" office:value-type="string">
            <text:p text:style-name="P247">Jer 2:22</text:p>
          </table:table-cell>
          <table:table-cell table:style-name="Table3.A2" office:value-type="string">
            <text:p text:style-name="P248">soap</text:p>
          </table:table-cell>
          <table:table-cell table:style-name="Table3.A2" office:value-type="string">
            <text:p text:style-name="P249">sope</text:p>
          </table:table-cell>
          <table:table-cell table:style-name="Table3.A2" office:value-type="string">
            <text:p text:style-name="P250">soap</text:p>
          </table:table-cell>
          <table:table-cell table:style-name="Table3.E2" office:value-type="string">
            <text:p text:style-name="P251">sope</text:p>
          </table:table-cell>
        </table:table-row>
        <table:table-row>
          <table:table-cell table:style-name="Table3.A2" office:value-type="string">
            <text:p text:style-name="P252">Mal 3:2</text:p>
          </table:table-cell>
          <table:table-cell table:style-name="Table3.A2" office:value-type="string">
            <text:p text:style-name="P253">soap</text:p>
          </table:table-cell>
          <table:table-cell table:style-name="Table3.A2" office:value-type="string">
            <text:p text:style-name="P254">sope</text:p>
          </table:table-cell>
          <table:table-cell table:style-name="Table3.A2" office:value-type="string">
            <text:p text:style-name="P255">soap</text:p>
          </table:table-cell>
          <table:table-cell table:style-name="Table3.E2" office:value-type="string">
            <text:p text:style-name="P256">soa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2in" fo:page-height="20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4:10:19.625231300</meta:creation-date>
    <dc:title>default</dc:title>
    <meta:editing-duration>P2DT15M54S</meta:editing-duration>
    <meta:editing-cycles>399</meta:editing-cycles>
    <meta:generator>LibreOffice/26.2.4.2$Linux_X86_64 LibreOffice_project/64a984c51f4702dbd3710b13428c673a2f1292e7</meta:generator>
    <meta:initial-creator>William K. McDannell Jr.</meta:initial-creator>
    <dc:date>2026-07-11T12:30:19.150376856</dc:date>
    <meta:document-statistic meta:table-count="3" meta:image-count="20" meta:object-count="0" meta:page-count="1" meta:paragraph-count="477" meta:word-count="2571" meta:character-count="13550" meta:non-whitespace-character-count="11754"/>
    <meta:template xlink:type="simple" xlink:actuate="onRequest" xlink:title="default" xlink:href="../../../../AppData/Roaming/LibreOffice/4/user/template/default.ott" meta:date="2025-09-23T07:58:13.357209000"/>
  </office:meta>
</office:document-meta>
</file>