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Table10" style:family="table">
      <style:table-properties style:width="7.9in" table:align="margins"/>
    </style:style>
    <style:style style:name="Table10.A" style:family="table-column">
      <style:table-column-properties style:column-width="7.9in" style:rel-column-width="65535*"/>
    </style:style>
    <style:style style:name="Table10.A1" style:family="table-cell">
      <style:table-cell-properties fo:padding="0.0382in" fo:border="0.5pt solid #000000"/>
    </style:style>
    <style:style style:name="Table12" style:family="table">
      <style:table-properties style:width="7.9in" table:align="margins"/>
    </style:style>
    <style:style style:name="Table12.A" style:family="table-column">
      <style:table-column-properties style:column-width="7.9in" style:rel-column-width="65535*"/>
    </style:style>
    <style:style style:name="Table12.A1" style:family="table-cell">
      <style:table-cell-properties fo:padding="0.0382in" fo:border="0.5pt solid #000000"/>
    </style:style>
    <style:style style:name="Table8" style:family="table">
      <style:table-properties style:width="7.9in" table:align="margins"/>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P1" style:family="paragraph" style:parent-style-name="Standard" style:list-style-name="L1">
      <style:text-properties officeooo:rsid="00405c62" officeooo:paragraph-rsid="00405c62"/>
    </style:style>
    <style:style style:name="P2" style:family="paragraph" style:parent-style-name="Standard" style:list-style-name="L1">
      <style:text-properties officeooo:rsid="0043f62e" officeooo:paragraph-rsid="0043f62e"/>
    </style:style>
    <style:style style:name="P3" style:family="paragraph" style:parent-style-name="Standard" style:list-style-name="L1">
      <style:text-properties officeooo:rsid="00306c5c" officeooo:paragraph-rsid="00306c5c"/>
    </style:style>
    <style:style style:name="P4" style:family="paragraph" style:parent-style-name="Standard" style:list-style-name="L1">
      <style:text-properties officeooo:rsid="00320b15" officeooo:paragraph-rsid="00320b15"/>
    </style:style>
    <style:style style:name="P5" style:family="paragraph" style:parent-style-name="Standard" style:list-style-name="L1"/>
    <style:style style:name="P6" style:family="paragraph" style:parent-style-name="Standard">
      <style:text-properties officeooo:rsid="002f4616" officeooo:paragraph-rsid="002f4616"/>
    </style:style>
    <style:style style:name="P7" style:family="paragraph" style:parent-style-name="Table_20_Contents">
      <style:text-properties fo:color="#ff0000" loext:opacity="100%"/>
    </style:style>
    <style:style style:name="P8" style:family="paragraph" style:parent-style-name="Table_20_Contents">
      <style:text-properties style:use-window-font-color="true" loext:opacity="0%"/>
    </style:style>
    <style:style style:name="P9" style:family="paragraph" style:parent-style-name="Table_20_Contents">
      <style:text-properties style:use-window-font-color="true" loext:opacity="0%" officeooo:rsid="00531bd0" officeooo:paragraph-rsid="00531bd0"/>
    </style:style>
    <style:style style:name="P10" style:family="paragraph" style:parent-style-name="Standard">
      <style:text-properties officeooo:paragraph-rsid="0013d6ea"/>
    </style:style>
    <style:style style:name="P11" style:family="paragraph" style:parent-style-name="Standard">
      <style:text-properties officeooo:rsid="00559ff8" officeooo:paragraph-rsid="005b56d8"/>
    </style:style>
    <style:style style:name="P12" style:family="paragraph" style:parent-style-name="Standard">
      <style:text-properties officeooo:rsid="005980bd" officeooo:paragraph-rsid="005b56d8"/>
    </style:style>
    <style:style style:name="P13" style:family="paragraph" style:parent-style-name="Standard">
      <style:text-properties officeooo:rsid="005980bd" officeooo:paragraph-rsid="0064f388"/>
    </style:style>
    <style:style style:name="P14" style:family="paragraph" style:parent-style-name="Standard" style:list-style-name="L2">
      <style:text-properties officeooo:paragraph-rsid="0064f388"/>
    </style:style>
    <style:style style:name="P15" style:family="paragraph" style:parent-style-name="Standard">
      <style:text-properties officeooo:paragraph-rsid="0027b11a"/>
    </style:style>
    <style:style style:name="P16" style:family="paragraph" style:parent-style-name="Table_20_Contents">
      <style:text-properties officeooo:paragraph-rsid="0027b11a"/>
    </style:style>
    <style:style style:name="P17" style:family="paragraph" style:parent-style-name="Standard">
      <style:text-properties officeooo:rsid="00290350" officeooo:paragraph-rsid="00290350"/>
    </style:style>
    <style:style style:name="P18" style:family="paragraph" style:parent-style-name="Table_20_Contents">
      <style:text-properties officeooo:paragraph-rsid="00290350"/>
    </style:style>
    <style:style style:name="P19" style:family="paragraph" style:parent-style-name="Standard">
      <style:text-properties officeooo:rsid="006bbabb" officeooo:paragraph-rsid="006bbabb"/>
    </style:style>
    <style:style style:name="P20" style:family="paragraph" style:parent-style-name="Standard" style:list-style-name="L3">
      <style:text-properties officeooo:rsid="006f47dd" officeooo:paragraph-rsid="006f47dd"/>
    </style:style>
    <style:style style:name="P21" style:family="paragraph" style:parent-style-name="Standard">
      <style:text-properties officeooo:rsid="006f47dd" officeooo:paragraph-rsid="006f47dd"/>
    </style:style>
    <style:style style:name="P22" style:family="paragraph" style:parent-style-name="Standard">
      <style:text-properties officeooo:rsid="0072d28c" officeooo:paragraph-rsid="0072d28c"/>
    </style:style>
    <style:style style:name="P23" style:family="paragraph" style:parent-style-name="Table_20_Contents">
      <style:text-properties officeooo:paragraph-rsid="0081f2aa"/>
    </style:style>
    <style:style style:name="P24" style:family="paragraph" style:parent-style-name="Standard" style:list-style-name="L4">
      <style:text-properties officeooo:rsid="0013d6ea" officeooo:paragraph-rsid="0081f2aa"/>
    </style:style>
    <style:style style:name="P25" style:family="paragraph" style:parent-style-name="Standard">
      <style:text-properties officeooo:rsid="0013d6ea" officeooo:paragraph-rsid="0081f2aa"/>
    </style:style>
    <style:style style:name="P26" style:family="paragraph" style:parent-style-name="Standard" style:list-style-name="L5">
      <style:text-properties officeooo:rsid="0013d6ea" officeooo:paragraph-rsid="0013d6ea"/>
    </style:style>
    <style:style style:name="P27" style:family="paragraph" style:parent-style-name="Standard">
      <style:text-properties officeooo:rsid="0090309d" officeooo:paragraph-rsid="0090309d"/>
    </style:style>
    <style:style style:name="P28" style:family="paragraph" style:parent-style-name="Standard">
      <style:text-properties officeooo:paragraph-rsid="009193e9"/>
    </style:style>
    <style:style style:name="P29" style:family="paragraph" style:parent-style-name="Standard" style:list-style-name="L6">
      <style:text-properties officeooo:paragraph-rsid="0087f68f"/>
    </style:style>
    <style:style style:name="P30" style:family="paragraph" style:parent-style-name="Standard" style:list-style-name="L6">
      <style:text-properties style:use-window-font-color="true" loext:opacity="0%" officeooo:rsid="0087f68f" officeooo:paragraph-rsid="0087f68f"/>
    </style:style>
    <style:style style:name="P31" style:family="paragraph" style:parent-style-name="Standard" style:list-style-name="L6">
      <style:text-properties officeooo:paragraph-rsid="0098692d"/>
    </style:style>
    <style:style style:name="P32" style:family="paragraph" style:parent-style-name="Standard">
      <style:text-properties officeooo:rsid="009945f9" officeooo:paragraph-rsid="009945f9"/>
    </style:style>
    <style:style style:name="P33" style:family="paragraph" style:parent-style-name="Table_20_Contents">
      <style:text-properties officeooo:paragraph-rsid="009b8bc3"/>
    </style:style>
    <style:style style:name="P34" style:family="paragraph" style:parent-style-name="Standard">
      <style:text-properties officeooo:rsid="0015fe35" officeooo:paragraph-rsid="0015fe35"/>
    </style:style>
    <style:style style:name="P35" style:family="paragraph" style:parent-style-name="Standard" style:list-style-name="L7">
      <style:text-properties officeooo:rsid="009ed6e7" officeooo:paragraph-rsid="009ed6e7"/>
    </style:style>
    <style:style style:name="P36" style:family="paragraph" style:parent-style-name="Standard">
      <style:text-properties officeooo:rsid="0016e9bc" officeooo:paragraph-rsid="0015fe35"/>
    </style:style>
    <style:style style:name="T1" style:family="text">
      <style:text-properties fo:color="#127622" loext:opacity="100%"/>
    </style:style>
    <style:style style:name="T2" style:family="text">
      <style:text-properties fo:color="#127622" loext:opacity="100%" officeooo:rsid="003c78bd"/>
    </style:style>
    <style:style style:name="T3" style:family="text">
      <style:text-properties style:text-position="33% 80%"/>
    </style:style>
    <style:style style:name="T4" style:family="text">
      <style:text-properties fo:background-color="#fff5ce" loext:char-shading-value="0"/>
    </style:style>
    <style:style style:name="T5" style:family="text">
      <style:text-properties officeooo:rsid="00422805"/>
    </style:style>
    <style:style style:name="T6" style:family="text">
      <style:text-properties officeooo:rsid="0043e67a"/>
    </style:style>
    <style:style style:name="T7" style:family="text">
      <style:text-properties officeooo:rsid="00489737"/>
    </style:style>
    <style:style style:name="T8" style:family="text">
      <style:text-properties officeooo:rsid="0046a1cd"/>
    </style:style>
    <style:style style:name="T9" style:family="text">
      <style:text-properties officeooo:rsid="00320b15"/>
    </style:style>
    <style:style style:name="T10" style:family="text">
      <style:text-properties fo:color="#ff0000" loext:opacity="100%"/>
    </style:style>
    <style:style style:name="T11" style:family="text">
      <style:text-properties style:use-window-font-color="true" loext:opacity="0%" style:text-position="33% 80%"/>
    </style:style>
    <style:style style:name="T12" style:family="text">
      <style:text-properties style:use-window-font-color="true" loext:opacity="0%"/>
    </style:style>
    <style:style style:name="T13" style:family="text">
      <style:text-properties officeooo:rsid="0056a55d"/>
    </style:style>
    <style:style style:name="T14" style:family="text">
      <style:text-properties officeooo:rsid="0057a9f2"/>
    </style:style>
    <style:style style:name="T15" style:family="text">
      <style:text-properties officeooo:rsid="005b56d8"/>
    </style:style>
    <style:style style:name="T16" style:family="text">
      <style:text-properties officeooo:rsid="005b9e17"/>
    </style:style>
    <style:style style:name="T17" style:family="text">
      <style:text-properties officeooo:rsid="005bbf0f"/>
    </style:style>
    <style:style style:name="T18" style:family="text">
      <style:text-properties officeooo:rsid="005db855"/>
    </style:style>
    <style:style style:name="T19" style:family="text">
      <style:text-properties officeooo:rsid="005e4bf1"/>
    </style:style>
    <style:style style:name="T20" style:family="text">
      <style:text-properties officeooo:rsid="0063adc8"/>
    </style:style>
    <style:style style:name="T21" style:family="text">
      <style:text-properties fo:color="#127622" loext:opacity="100%" officeooo:rsid="0063adc8"/>
    </style:style>
    <style:style style:name="T22" style:family="text">
      <style:text-properties fo:color="#127622" loext:opacity="100%" officeooo:rsid="005e4bf1"/>
    </style:style>
    <style:style style:name="T23" style:family="text">
      <style:text-properties officeooo:rsid="00642d32"/>
    </style:style>
    <style:style style:name="T24" style:family="text">
      <style:text-properties officeooo:rsid="00603346"/>
    </style:style>
    <style:style style:name="T25" style:family="text">
      <style:text-properties officeooo:rsid="005f8477"/>
    </style:style>
    <style:style style:name="T26" style:family="text">
      <style:text-properties officeooo:rsid="00a24a88"/>
    </style:style>
    <style:style style:name="T27" style:family="text">
      <style:text-properties officeooo:rsid="00a3f8ff"/>
    </style:style>
    <style:style style:name="T28" style:family="text">
      <style:text-properties officeooo:rsid="0064f388"/>
    </style:style>
    <style:style style:name="T29" style:family="text">
      <style:text-properties officeooo:rsid="0061e7b6"/>
    </style:style>
    <style:style style:name="T30" style:family="text">
      <style:text-properties officeooo:rsid="00629383"/>
    </style:style>
    <style:style style:name="T31" style:family="text">
      <style:text-properties fo:color="#127622" loext:opacity="100%" officeooo:rsid="00629383"/>
    </style:style>
    <style:style style:name="T32" style:family="text">
      <style:text-properties officeooo:rsid="0065e82e"/>
    </style:style>
    <style:style style:name="T33" style:family="text">
      <style:text-properties officeooo:rsid="0027b11a"/>
    </style:style>
    <style:style style:name="T34" style:family="text">
      <style:text-properties officeooo:rsid="00a595b2"/>
    </style:style>
    <style:style style:name="T35" style:family="text">
      <style:text-properties fo:color="#127622" loext:opacity="100%" officeooo:rsid="006f8f52"/>
    </style:style>
    <style:style style:name="T36" style:family="text">
      <style:text-properties officeooo:rsid="00709749"/>
    </style:style>
    <style:style style:name="T37" style:family="text">
      <style:text-properties fo:color="#127622" loext:opacity="100%" officeooo:rsid="00709749"/>
    </style:style>
    <style:style style:name="T38" style:family="text">
      <style:text-properties officeooo:rsid="007e66e7"/>
    </style:style>
    <style:style style:name="T39" style:family="text">
      <style:text-properties officeooo:rsid="00718da0"/>
    </style:style>
    <style:style style:name="T40" style:family="text">
      <style:text-properties officeooo:rsid="00804302"/>
    </style:style>
    <style:style style:name="T41" style:family="text">
      <style:text-properties officeooo:rsid="007fa2d0"/>
    </style:style>
    <style:style style:name="T42" style:family="text">
      <style:text-properties officeooo:rsid="00746213"/>
    </style:style>
    <style:style style:name="T43" style:family="text">
      <style:text-properties fo:color="#ff0000" loext:opacity="100%" fo:background-color="#fff5ce" loext:char-shading-value="0"/>
    </style:style>
    <style:style style:name="T44" style:family="text">
      <style:text-properties officeooo:rsid="007b9d0d"/>
    </style:style>
    <style:style style:name="T45" style:family="text">
      <style:text-properties officeooo:rsid="00143774"/>
    </style:style>
    <style:style style:name="T46" style:family="text">
      <style:text-properties officeooo:rsid="009193e9"/>
    </style:style>
    <style:style style:name="T47" style:family="text">
      <style:text-properties fo:color="#127622" loext:opacity="100%" officeooo:rsid="009193e9"/>
    </style:style>
    <style:style style:name="T48" style:family="text">
      <style:text-properties officeooo:rsid="0092eb99"/>
    </style:style>
    <style:style style:name="T49" style:family="text">
      <style:text-properties officeooo:rsid="0090309d"/>
    </style:style>
    <style:style style:name="T50" style:family="text">
      <style:text-properties fo:color="#127622" loext:opacity="100%" officeooo:rsid="0092eb99"/>
    </style:style>
    <style:style style:name="T51" style:family="text">
      <style:text-properties officeooo:rsid="00945533"/>
    </style:style>
    <style:style style:name="T52" style:family="text">
      <style:text-properties officeooo:rsid="00843b69"/>
    </style:style>
    <style:style style:name="T53" style:family="text">
      <style:text-properties officeooo:rsid="0086b9a8"/>
    </style:style>
    <style:style style:name="T54" style:family="text">
      <style:text-properties officeooo:rsid="008de71f"/>
    </style:style>
    <style:style style:name="T55" style:family="text">
      <style:text-properties officeooo:rsid="0087f68f"/>
    </style:style>
    <style:style style:name="T56" style:family="text">
      <style:text-properties officeooo:rsid="0094cf36"/>
    </style:style>
    <style:style style:name="T57" style:family="text">
      <style:text-properties fo:color="#127622" loext:opacity="100%" officeooo:rsid="00843b69"/>
    </style:style>
    <style:style style:name="T58" style:family="text">
      <style:text-properties style:use-window-font-color="true" loext:opacity="0%" officeooo:rsid="00843b69"/>
    </style:style>
    <style:style style:name="T59" style:family="text">
      <style:text-properties officeooo:rsid="008acf56"/>
    </style:style>
    <style:style style:name="T60" style:family="text">
      <style:text-properties officeooo:rsid="008b2073"/>
    </style:style>
    <style:style style:name="T61" style:family="text">
      <style:text-properties officeooo:rsid="0084fa60"/>
    </style:style>
    <style:style style:name="T62" style:family="text">
      <style:text-properties officeooo:rsid="00966de9"/>
    </style:style>
    <style:style style:name="T63" style:family="text">
      <style:text-properties fo:color="#127622" loext:opacity="100%" officeooo:rsid="0084fa60"/>
    </style:style>
    <style:style style:name="T64" style:family="text">
      <style:text-properties officeooo:rsid="00894d73"/>
    </style:style>
    <style:style style:name="T65" style:family="text">
      <style:text-properties fo:color="#127622" loext:opacity="100%" officeooo:rsid="00894d73"/>
    </style:style>
    <style:style style:name="T66" style:family="text">
      <style:text-properties officeooo:rsid="00863a7b"/>
    </style:style>
    <style:style style:name="T67" style:family="text">
      <style:text-properties officeooo:rsid="0096b769"/>
    </style:style>
    <style:style style:name="T68" style:family="text">
      <style:text-properties fo:color="#127622" loext:opacity="100%" officeooo:rsid="00863a7b"/>
    </style:style>
    <style:style style:name="T69" style:family="text">
      <style:text-properties officeooo:rsid="008d0641"/>
    </style:style>
    <style:style style:name="T70" style:family="text">
      <style:text-properties officeooo:rsid="008d1054"/>
    </style:style>
    <style:style style:name="T71" style:family="text">
      <style:text-properties fo:color="#127622" loext:opacity="100%" officeooo:rsid="008d0641"/>
    </style:style>
    <style:style style:name="T72" style:family="text">
      <style:text-properties fo:color="#127622" loext:opacity="100%" officeooo:rsid="008d1054"/>
    </style:style>
    <style:style style:name="T73" style:family="text">
      <style:text-properties officeooo:rsid="0096c974"/>
    </style:style>
    <style:style style:name="T74" style:family="text">
      <style:text-properties fo:color="#127622" loext:opacity="100%" officeooo:rsid="0096c974"/>
    </style:style>
    <style:style style:name="T75" style:family="text">
      <style:text-properties officeooo:rsid="0098692d"/>
    </style:style>
    <style:style style:name="T76" style:family="text">
      <style:text-properties fo:color="#127622" loext:opacity="100%" officeooo:rsid="00a84755"/>
    </style:style>
    <style:style style:name="T77" style:family="text">
      <style:text-properties fo:color="#127622" loext:opacity="100%" officeooo:rsid="0015fe35"/>
    </style:style>
    <style:style style:name="T78" style:family="text">
      <style:text-properties officeooo:rsid="0099f6de"/>
    </style:style>
    <style:style style:name="T79" style:family="text">
      <style:text-properties officeooo:rsid="009a2350"/>
    </style:style>
    <style:style style:name="T80" style:family="text">
      <style:text-properties officeooo:rsid="009ed6e7"/>
    </style:style>
    <style:style style:name="T81" style:family="text">
      <style:text-properties officeooo:rsid="009d317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7" table:style-name="Table7">
        <table:table-column table:style-name="Table7.A"/>
        <table:table-row>
          <table:table-cell table:style-name="Table7.A1" office:value-type="string">
            <text:p text:style-name="Table_20_Contents"><text:span text:style-name="T1">Leviticus 16:1-</text:span><text:span text:style-name="T2">22</text:span><text:line-break/><text:span text:style-name="T3">1</text:span> And the LORD spake unto Moses after the death of the two sons of Aaron, when they offered before the LORD, and died; <text:span text:style-name="T3">2</text:span> And the LORD said unto Moses, Speak unto Aaron thy brother, that he come not at all times into the holy place within the vail before the mercy seat, which is upon the ark; that he die not: for I will appear in the cloud upon the mercy seat. <text:span text:style-name="T3">3</text:span> Thus shall Aaron come into the holy place: with a young bullock for a sin offering, and a ram for a burnt offering. <text:span text:style-name="T3">4</text:span> <text:span text:style-name="T4">He shall put on the holy linen coat, and he shall have the linen breeches upon his flesh, and shall be girded with a linen girdle, and with the linen mitre shall he be attired: these are holy garments; therefore shall he wash his flesh in water, and so put them on.</text:span> <text:span text:style-name="T3">5</text:span> And he shall take of the congregation of the children of Israel two kids of the goats for a sin offering, and one ram for a burnt offering. <text:span text:style-name="T3">6</text:span> <text:span text:style-name="T4">And Aaron shall offer his bullock of the sin offering, which is for himself, and make an atonement for himself, and for his house.</text:span> <text:span text:style-name="T3">7</text:span> And he shall take the two goats, and present them before the LORD at the door of the tabernacle of the congregation. <text:span text:style-name="T3">8</text:span> And Aaron shall cast lots upon the two goats; one lot for the LORD, and the other lot for the scapegoat. <text:span text:style-name="T3">9</text:span> And Aaron shall bring the goat upon which the LORD's lot fell, and offer him for a sin offering. <text:span text:style-name="T3">10</text:span> But the goat, on which the lot fell to be the scapegoat, shall be presented alive before the LORD, to make an atonement with him, and to let him go for a scapegoat into the wilderness. <text:span text:style-name="T3">11</text:span> <text:span text:style-name="T4">And Aaron shall bring the bullock of the sin offering, which is for himself, and shall make an atonement for himself, and for his house, and shall kill the bullock of the sin offering which is for himself:</text:span> <text:span text:style-name="T3">12</text:span> And he shall take a censer full of burning coals of fire from off the altar before the LORD, and his hands full of sweet incense beaten small, and bring it within the vail: <text:span text:style-name="T3">13</text:span> And he shall put the incense upon the fire before the LORD, that the cloud of the incense may cover the mercy seat that is upon the testimony, that he die not: <text:span text:style-name="T3">14</text:span> And he shall take of the blood of the bullock, and sprinkle it with his finger upon the mercy seat eastward; and before the mercy seat shall he sprinkle of the blood with his finger seven times. <text:span text:style-name="T3">15</text:span> <text:span text:style-name="T4">Then shall he kill the goat of the sin offering, that is for the people</text:span>, and bring his blood within the vail, and do with that blood as he did with the blood of the bullock, and sprinkle it upon the mercy seat, and before the mercy seat: <text:span text:style-name="T3">16</text:span> And he shall make an atonement for the holy place, because of the uncleanness of the children of Israel, and because of their transgressions in all their sins: and so shall he do for the tabernacle of the congregation, that remaineth among them in the midst of their uncleanness. <text:span text:style-name="T3">17</text:span> And there shall be no man in the tabernacle of the congregation when he goeth in to make an atonement in the holy place, until he come out, and have made an <text:span text:style-name="T4">atonement for himself, and for his household, and for all the congregation of Israel</text:span>. <text:span text:style-name="T3">18</text:span> And he shall go out unto the altar that is before the LORD, and make an atonement for it; and shall take of the blood of the bullock, and of the blood of the goat, and put it upon the horns of the altar round about. <text:span text:style-name="T3">19</text:span> And he shall sprinkle of the blood upon it with his finger seven times, and cleanse it, and hallow it from the uncleanness of the children of Israel. <text:span text:style-name="T3">20</text:span> And when he hath made an end of reconciling the holy place, and the tabernacle of the congregation, and the altar, he shall bring the live goat: <text:span text:style-name="T3">21</text:span> And Aaron shall lay both his hands upon the head of the live goat, and confess over him all the iniquities of the children of Israel, and all their transgressions in all their sins, putting them upon the head of the goat, and shall send him away by the hand of a fit man into the wilderness: <text:span text:style-name="T3">22</text:span> And the goat shall bear upon him all their iniquities unto a land not inhabited: and he shall let go the goat in the wilderness.</text:p>
          </table:table-cell>
        </table:table-row>
      </table:table>
      <text:list text:style-name="L1">
        <text:list-item>
          <text:p text:style-name="P1">Everyone was commanded to fast <text:span text:style-name="T5">and to not work </text:span><text:span text:style-name="T6">at all </text:span>on the day of atonement (<text:span text:style-name="T1">Lev 16:29</text:span>).</text:p>
        </text:list-item>
        <text:list-item>
          <text:p text:style-name="P2">The high priest was to <text:span text:style-name="T7">wear special linen garments and </text:span>wash himself both before offering atonement for the holy place <text:span text:style-name="T8">and after the scapegoat was released into the wilderness.</text:span></text:p>
        </text:list-item>
        <text:list-item>
          <text:p text:style-name="P3">The first sin offering <text:span text:style-name="T9">(a bullock)</text:span> was for the priest and his house.</text:p>
        </text:list-item>
        <text:list-item>
          <text:p text:style-name="P4">The second sin offering (a goat) was for the people.</text:p>
        </text:list-item>
        <text:list-item>
          <text:p text:style-name="P5">The order of atonement is: yourself, your house, then other people.</text:p>
        </text:list-item>
      </text:list>
      <text:p text:style-name="P6"/>
      <text:p text:style-name="P6"/>
      <text:p text:style-name="P6"/>
      <text:p text:style-name="P6"/>
      <text:p text:style-name="P6"/>
      <text:p text:style-name="P6"><text:soft-page-break/></text:p>
      <table:table table:name="Table2" table:style-name="Table2">
        <table:table-column table:style-name="Table2.A"/>
        <table:table-row>
          <table:table-cell table:style-name="Table2.A1" office:value-type="string">
            <text:p text:style-name="Table_20_Contents"><text:span text:style-name="T1">John 2:19</text:span><text:line-break/><text:span text:style-name="T3">19</text:span> Jesus answered and said unto them, <text:span text:style-name="T10">Destroy this temple, and in three days I will raise it up.</text:span></text:p>
            <text:p text:style-name="P7"/>
            <text:p text:style-name="P7"><text:span text:style-name="T1">Matthew 5:17</text:span><text:line-break/><text:span text:style-name="T11">17</text:span><text:span text:style-name="T12"> </text:span>Think not that I am come to destroy the law, or the prophets: I am not come to destroy, but to fulfil.</text:p>
            <text:p text:style-name="P7"/>
            <text:p text:style-name="P7"><text:span text:style-name="T1">John 19:30</text:span><text:line-break/><text:span text:style-name="T11">30</text:span><text:span text:style-name="T12"> When Jesus therefore had received the vinegar, he said, </text:span>It is finished:<text:span text:style-name="T12"> and he bowed his head, and gave up the ghost.</text:span></text:p>
            <text:p text:style-name="P8"/>
            <text:p text:style-name="P8"><text:span text:style-name="T1">Romans 10:4</text:span><text:line-break/><text:span text:style-name="T3">4</text:span> For Christ is the end of the law for righteousness to every one that believeth.</text:p>
            <text:p text:style-name="P8"/>
            <text:p text:style-name="P9"><text:span text:style-name="T1">Acts 2</text:span> (God begins building His temple at Pentecost)</text:p>
            <text:p text:style-name="P9"/>
            <text:p text:style-name="P8"><text:span text:style-name="T1">Ephesians 2:19-22</text:span><text:line-break/><text:span text:style-name="T3">19</text:span> Now therefore ye are no more strangers and foreigners, but fellowcitizens with the saints, and of the household of God; <text:span text:style-name="T3">20</text:span> And are built upon the foundation of the apostles and prophets, Jesus Christ himself being the chief corner stone; <text:span text:style-name="T3">21</text:span> In whom all the building fitly framed together groweth unto an <text:span text:style-name="T4">holy temple in the Lord:</text:span> <text:span text:style-name="T3">22</text:span> In whom ye also are builded together for <text:span text:style-name="T4">an habitation of God through the Spirit</text:span>.</text:p>
          </table:table-cell>
        </table:table-row>
      </table:table>
      <text:p text:style-name="P6"/>
      <table:table table:name="Table1" table:style-name="Table1">
        <table:table-column table:style-name="Table1.A"/>
        <table:table-row>
          <table:table-cell table:style-name="Table1.A1" office:value-type="string">
            <text:p text:style-name="Standard"><text:span text:style-name="T1">1 Corinthians 3:9-17</text:span><text:line-break/><text:span text:style-name="T3">9</text:span> For we are labourers together with God: ye are God's husbandry, ye are God's building. <text:span text:style-name="T3">10</text:span> According to the grace of God which is given unto me, as a wise masterbuilder, I have laid the foundation, and another buildeth thereon. But let every man take heed how he buildeth thereupon. <text:span text:style-name="T3">11</text:span> For other foundation can no man lay than that is laid, which is Jesus Christ. <text:span text:style-name="T3">12</text:span> Now if any man build upon this foundation gold, silver, precious stones, wood, hay, stubble; <text:span text:style-name="T3">13</text:span> Every man's work shall be made manifest: for the day shall declare it, because it shall be revealed by fire; and the fire shall try every man's work of what sort it is. <text:span text:style-name="T3">14</text:span> If any man's work abide which he hath built thereupon, he shall receive a reward. <text:span text:style-name="T3">15</text:span> If any man's work shall be burned, he shall suffer loss: but he himself shall be saved; yet so as by fire. <text:span text:style-name="T3">16</text:span> Know ye not that <text:span text:style-name="T4">ye are the temple of God</text:span>, and that the Spirit of God dwelleth in you? <text:span text:style-name="T3">17</text:span> If any man defile the temple of God, him shall God destroy; for the temple of God is holy, which temple ye are.</text:p>
          </table:table-cell>
        </table:table-row>
      </table:table>
      <text:p text:style-name="P10"/>
      <text:p text:style-name="P10"/>
      <text:p text:style-name="P11">So <text:span text:style-name="T13">after the resurrection of Jesus </text:span>now the body of believers in whom the Holy Ghost indwells when they are reborn are the new temple. How then does the new temple get “dirty”: <text:span text:style-name="T14">exactly the same as the old physical temple: sin. </text:span><text:span text:style-name="T15">The vast majority of the day of atonement is </text:span><text:span text:style-name="T16">centered around </text:span><text:span text:style-name="T15">“reconciling the holy place”. Think about why God chose to use the verb “reconcile”. </text:span><text:span text:style-name="T17">What they were commanded to do was what God required to bring them back into a right relationship with Him.</text:span></text:p>
      <text:p text:style-name="P12"/>
      <text:p text:style-name="P13">But, since Christ <text:span text:style-name="T18">is</text:span> the end of the law is <text:span text:style-name="T19">the process of </text:span>reconciling <text:span text:style-name="T19">our relationship with God</text:span> the same as it used to be? Yes and no.</text:p>
      <text:list text:style-name="L2">
        <text:list-item>
          <text:p text:style-name="P14"><text:span text:style-name="T19">Yes, because a sacrifice was required </text:span><text:span text:style-name="T20">(</text:span><text:span text:style-name="T21">Hebrew 9:22</text:span><text:span text:style-name="T20">) </text:span><text:span text:style-name="T19">of which Christ was and always will be sufficient for (</text:span><text:span text:style-name="T22">1Pet 1:9</text:span><text:span text:style-name="T19">, </text:span><text:span text:style-name="T22">1Cor 5:7</text:span><text:span text:style-name="T19">) and because there is </text:span><text:span text:style-name="T23">still </text:span><text:span text:style-name="T19">a God ordained order </text:span><text:span text:style-name="T24">in</text:span><text:span text:style-name="T19"> </text:span><text:span text:style-name="T25">how sin is handled. </text:span><text:span text:style-name="T26">We also still have duties </text:span><text:span text:style-name="T27">and </text:span><text:span text:style-name="T26">although they aren’t exactly the same there are many parallels.</text:span></text:p>
        </text:list-item>
        <text:list-item>
          <text:p text:style-name="P14"><text:span text:style-name="T28">N</text:span><text:span text:style-name="T29">o, because reborn believers are not required to keep the </text:span><text:span text:style-name="T30">law which was weak through the flesh (</text:span><text:span text:style-name="T31">Rom 8:3</text:span><text:span text:style-name="T30">) and could never take away sin </text:span><text:span text:style-name="T32">or cleanse the conscience of sin </text:span><text:span text:style-name="T30">(</text:span><text:span text:style-name="T31">John 1:29</text:span><text:span text:style-name="T30">, </text:span><text:span text:style-name="T31">Heb 10:1-4</text:span><text:span text:style-name="T30">).</text:span></text:p>
        </text:list-item>
      </text:list>
      <text:p text:style-name="P12"/>
      <text:p text:style-name="P15"><text:soft-page-break/><text:span text:style-name="T33">When we sin, the </text:span><text:span text:style-name="T34">thief</text:span><text:span text:style-name="T33"> come</text:span><text:span text:style-name="T34">s</text:span><text:span text:style-name="T33">:</text:span></text:p>
      <table:table table:name="Table9" table:style-name="Table9">
        <table:table-column table:style-name="Table9.A"/>
        <table:table-row>
          <table:table-cell table:style-name="Table9.A1" office:value-type="string">
            <text:p text:style-name="P16"><text:span text:style-name="T1">Genesis 4:7</text:span><text:line-break/>If thou doest well, shalt thou not be accepted? and if thou doest not well, <text:span text:style-name="T4">sin</text:span> lieth at the door. And unto thee shall be <text:span text:style-name="T4">his</text:span> desire, and thou shalt rule over <text:span text:style-name="T4">him</text:span>.</text:p>
          </table:table-cell>
        </table:table-row>
      </table:table>
      <text:p text:style-name="P17"/>
      <text:p text:style-name="P17">The <text:span text:style-name="T34">thief has </text:span>three objectives:</text:p>
      <table:table table:name="Table10" table:style-name="Table10">
        <table:table-column table:style-name="Table10.A"/>
        <table:table-row>
          <table:table-cell table:style-name="Table10.A1" office:value-type="string">
            <text:p text:style-name="P18"><text:span text:style-name="T1">John 10:10</text:span><text:line-break/><text:span text:style-name="T3">10</text:span> <text:span text:style-name="T4">The thief cometh not, but for to steal, and to kill, and to destroy</text:span>: I am come that they might have life, and that they might have it more abundantly.</text:p>
          </table:table-cell>
        </table:table-row>
      </table:table>
      <text:p text:style-name="P17"/>
      <text:p text:style-name="P19">How should we treat sin in the temple?</text:p>
      <table:table table:name="Table12" table:style-name="Table12">
        <table:table-column table:style-name="Table12.A"/>
        <table:table-row>
          <table:table-cell table:style-name="Table12.A1" office:value-type="string">
            <text:p text:style-name="Table_20_Contents"><text:span text:style-name="T1">Job 1:1</text:span><text:line-break/>​There was a man in the land of Uz, whose name was Job; and that man was perfect and upright, and one that feared God, and <text:span text:style-name="T4">eschewed evil</text:span>.</text:p>
            <text:p text:style-name="Table_20_Contents"/>
            <text:p text:style-name="Table_20_Contents"><text:span text:style-name="T1">1 Peter 3:10-11</text:span><text:line-break/><text:span text:style-name="T3">10</text:span> For he that will love life, and see good days, let him refrain his tongue from evil, and his lips that they speak no guile: <text:span text:style-name="T3">11</text:span> <text:span text:style-name="T4">Let him eschew evil</text:span>, and do good; let him seek peace, and ensue it.</text:p>
          </table:table-cell>
        </table:table-row>
      </table:table>
      <text:list text:style-name="L3">
        <text:list-item>
          <text:p text:style-name="P20">To eschew is to depart (<text:span text:style-name="T1">2Ki 18:6</text:span>, <text:span text:style-name="T35">2Ch 20:32</text:span>), <text:span text:style-name="T36">to pluck away (</text:span><text:span text:style-name="T37">Lev 1:16</text:span><text:span text:style-name="T36">), to take away (</text:span><text:span text:style-name="T37">Exo 8:8</text:span><text:span text:style-name="T36">), </text:span><text:span text:style-name="T38">and </text:span><text:span text:style-name="T39">to </text:span>avoid (<text:span text:style-name="T1">Rom 16:17</text:span>). <text:span text:style-name="T38">The </text:span><text:span text:style-name="T40">Hebrew word for eschew which is </text:span><text:span text:style-name="T41">H5493 </text:span><text:span text:style-name="T40">is used 308 times in the Bible.</text:span></text:p>
        </text:list-item>
      </text:list>
      <text:p text:style-name="P21"/>
      <text:p text:style-name="P22">Jesus gave us a <text:span text:style-name="T42">vivid </text:span>example:</text:p>
      <table:table table:name="Table8" table:style-name="Table8">
        <table:table-column table:style-name="Table8.A"/>
        <table:table-row>
          <table:table-cell table:style-name="Table8.A1" office:value-type="string">
            <text:p text:style-name="P23"><text:span text:style-name="T1">Matthew 21:12-14</text:span><text:line-break/><text:span text:style-name="T3">12</text:span> And Jesus went into the temple of God, and <text:span text:style-name="T4">cast out</text:span> all them that sold and bought in the temple, and overthrew the tables of the moneychangers, and the seats of them that sold doves, <text:span text:style-name="T3">13</text:span> And said unto them, <text:span text:style-name="T10">It is written, My house shall be called the house of prayer; but ye have made it a den of </text:span><text:span text:style-name="T43">thieves</text:span><text:span text:style-name="T10">.</text:span> <text:span text:style-name="T3">14</text:span> And the blind and the lame came to him in the temple; and <text:span text:style-name="T4">he healed them</text:span>.</text:p>
          </table:table-cell>
        </table:table-row>
      </table:table>
      <text:list text:style-name="L4">
        <text:list-item>
          <text:p text:style-name="P24"><text:span text:style-name="T44">After </text:span><text:span text:style-name="T45">the temple is “cleaned </text:span><text:span text:style-name="T44">out”</text:span><text:span text:style-name="T45">, then </text:span>there is healing.</text:p>
        </text:list-item>
      </text:list>
      <text:p text:style-name="P25"/>
      <table:table table:name="Table3" table:style-name="Table3">
        <table:table-column table:style-name="Table3.A"/>
        <table:table-row>
          <table:table-cell table:style-name="Table3.A1" office:value-type="string">
            <text:p text:style-name="Table_20_Contents"><text:span text:style-name="T1">Luke 19:45-48</text:span><text:line-break/><text:span text:style-name="T3">45</text:span> And he went into the temple, and began to <text:span text:style-name="T4">cast out</text:span> them that sold therein, and them that bought; <text:span text:style-name="T3">46</text:span> Saying unto them, <text:span text:style-name="T10">It is written, My house is the house of prayer: but ye have made it a den of </text:span><text:span text:style-name="T43">thieves</text:span><text:span text:style-name="T10">.</text:span> <text:span text:style-name="T3">47</text:span> And <text:span text:style-name="T4">he taught daily in the temple</text:span>. But the chief priests and the scribes and the chief of the people sought to destroy him, <text:span text:style-name="T3">48</text:span> And could not find what they might do: for all the people were very attentive to hear him.</text:p>
          </table:table-cell>
        </table:table-row>
      </table:table>
      <text:list text:style-name="L5">
        <text:list-item>
          <text:p text:style-name="P26"><text:span text:style-name="T44">After the</text:span><text:span text:style-name="T45"> temple is “cleaned </text:span><text:span text:style-name="T44">out” </text:span><text:span text:style-name="T45">then </text:span>there is learning from God.</text:p>
        </text:list-item>
      </text:list>
      <text:p text:style-name="P27"/>
      <text:p text:style-name="P28"><text:span text:style-name="T46">The vessel (or body) of the reborn believer is the temple of God. Jesus Christ is our High priest (</text:span><text:span text:style-name="T47">Heb 3:1</text:span><text:span text:style-name="T46">) and we are His priests (</text:span><text:span text:style-name="T47">Rev 5:10</text:span><text:span text:style-name="T46">). </text:span><text:span text:style-name="T48">As God’s priests w</text:span><text:span text:style-name="T49">hat does </text:span><text:span text:style-name="T48">our</text:span><text:span text:style-name="T49"> daily “maintenance schedule” for the temple of God look like? We </text:span><text:span text:style-name="T48">need only to look to the duties of the Levites for our example (</text:span><text:span text:style-name="T50">1Cor 10:11, Rom 15:4, Heb 10:1, 2Ti 3:16,17</text:span><text:span text:style-name="T48">). </text:span><text:span text:style-name="T51">And when we do so we see that t</text:span><text:span text:style-name="T52">he </text:span><text:span text:style-name="T51">tabernacle/</text:span><text:span text:style-name="T52">temple of God requires </text:span><text:span text:style-name="T53">daily, </text:span><text:span text:style-name="T52">continual duties </text:span><text:span text:style-name="T54">with distinct parallels </text:span><text:span text:style-name="T51">in the new testament</text:span><text:span text:style-name="T52">:</text:span></text:p>
      <text:list text:style-name="L6">
        <text:list-item>
          <text:p text:style-name="P29"><text:span text:style-name="T55">C</text:span><text:span text:style-name="T52">ontinual burnt offering </text:span><text:span text:style-name="T56">(</text:span><text:span text:style-name="T57">Exo 29:38,39</text:span><text:span text:style-name="T52">, </text:span><text:span text:style-name="T57">Num 28:3,4</text:span>)<text:span text:style-name="T52"> and it’s fire </text:span><text:span text:style-name="T56">(</text:span><text:span text:style-name="T57">Lev 6:12,13</text:span>)<text:span text:style-name="T58">.</text:span></text:p>
          <text:list>
            <text:list-item>
              <text:p text:style-name="P30">Represents atonement <text:span text:style-name="T59">for sin </text:span>and dedication <text:span text:style-name="T60">to and submission to God</text:span> (<text:span text:style-name="T1">Lev 1:4, Heb 10:11, Lev 17:11</text:span>).</text:p>
            </text:list-item>
          </text:list>
        </text:list-item>
        <text:list-item>
          <text:p text:style-name="P29"><text:span text:style-name="T55">T</text:span><text:span text:style-name="T61">he perpetual incense burned in the morning and evening </text:span><text:span text:style-name="T62">(</text:span><text:span text:style-name="T63">Exo 30:7,8</text:span>).</text:p>
          <text:list>
            <text:list-item>
              <text:p text:style-name="P30">Represents prayer <text:span text:style-name="T64">(</text:span><text:span text:style-name="T65">Rev 5:8, 8:3,4</text:span><text:span text:style-name="T64">).</text:span></text:p>
            </text:list-item>
          </text:list>
        </text:list-item>
        <text:list-item>
          <text:p text:style-name="P29"><text:span text:style-name="T55">T</text:span><text:span text:style-name="T66">he continually burning oil lamps </text:span><text:span text:style-name="T67">(</text:span><text:span text:style-name="T68">Lev 24:1-4</text:span><text:span text:style-name="T61">).</text:span></text:p>
          <text:list>
            <text:list-item>
              <text:p text:style-name="P31"><text:span text:style-name="T69">Represents the </text:span><text:span text:style-name="T70">reborn </text:span><text:span text:style-name="T69">believer’s continual need for </text:span><text:span text:style-name="T70">fellowship with and </text:span><text:span text:style-name="T69">the light of the Holy Ghost (</text:span><text:span text:style-name="T71">Exodus 27:20,21, </text:span><text:span text:style-name="T72">Eph 5:18, 2Ti 1:6</text:span><text:span text:style-name="T70">) </text:span><text:span text:style-name="T73">guiding us into all truth (</text:span><text:span text:style-name="T74">Joh 16:13</text:span><text:span text:style-name="T73">) and shining through us as a witness in the darkness of the world </text:span><text:span text:style-name="T75">(</text:span><text:span text:style-name="T72">Mat 5:14-16, </text:span><text:span text:style-name="T76">John 1:5</text:span>).</text:p>
            </text:list-item>
          </text:list>
        </text:list-item>
      </text:list>
      <text:p text:style-name="P32"><text:soft-page-break/>Confirming the continual need for “maintenance” of the temple of God:</text:p>
      <table:table table:name="Table4" table:style-name="Table4">
        <table:table-column table:style-name="Table4.A"/>
        <table:table-row>
          <table:table-cell table:style-name="Table4.A1" office:value-type="string">
            <text:p text:style-name="P33"><text:span text:style-name="T1">1 John 1:8,</text:span><text:span text:style-name="T77">10</text:span><text:line-break/><text:span text:style-name="T3">8</text:span> If we say that we have no sin, we deceive ourselves, and the truth is not in us.</text:p>
            <text:p text:style-name="P33"><text:span text:style-name="T3">9</text:span> If we confess our sins, he is faithful and just to forgive us our sins, and to cleanse us from all unrighteousness.<text:line-break/><text:span text:style-name="T3">10</text:span> If we say that we have not sinned, we make him a liar, and his word is not in us.</text:p>
          </table:table-cell>
        </table:table-row>
      </table:table>
      <text:p text:style-name="P34"/>
      <text:p text:style-name="P34">So, how do we clean the temple of God? <text:span text:style-name="T78">In it’s simplest form we </text:span><text:span text:style-name="T79">obey God and </text:span><text:span text:style-name="T78">confess our sins to </text:span><text:span text:style-name="T79">Him</text:span><text:span text:style-name="T78">. But, as we have learned from the Levitical duties above there is far more to it than just confessing our sins </text:span><text:span text:style-name="T80">and we only looked at the daily duties</text:span><text:span text:style-name="T81">:</text:span></text:p>
      <text:list text:style-name="L7">
        <text:list-item>
          <text:p text:style-name="P35">Re-dedication and submission to God.</text:p>
        </text:list-item>
        <text:list-item>
          <text:p text:style-name="P35">Prayer</text:p>
        </text:list-item>
        <text:list-item>
          <text:p text:style-name="P35">Fellowship</text:p>
        </text:list-item>
        <text:list-item>
          <text:p text:style-name="P35">Imbibing, living, and sharing the truth</text:p>
        </text:list-item>
      </text:list>
      <text:p text:style-name="P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07T08:52:50.331762500</meta:creation-date>
    <dc:title>Cleaning out the temple of God</dc:title>
    <meta:editing-duration>PT3H41M42S</meta:editing-duration>
    <meta:editing-cycles>144</meta:editing-cycles>
    <meta:generator>LibreOffice/26.2.4.2$Linux_X86_64 LibreOffice_project/64a984c51f4702dbd3710b13428c673a2f1292e7</meta:generator>
    <dc:date>2026-07-11T12:20:29.382212496</dc:date>
    <meta:document-statistic meta:table-count="9" meta:image-count="0" meta:object-count="0" meta:page-count="4" meta:paragraph-count="45" meta:word-count="2194" meta:character-count="11347" meta:non-whitespace-character-count="9217"/>
    <meta:template xlink:type="simple" xlink:actuate="onRequest" xlink:title="default" xlink:href="../../../../AppData/Roaming/LibreOffice/4/user/template/default.ott" meta:date="2025-09-07T08:52:49.538274500"/>
  </office:meta>
</office:document-meta>
</file>