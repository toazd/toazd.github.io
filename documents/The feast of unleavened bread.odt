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18" style:family="table">
      <style:table-properties style:width="7.9in" table:align="margins"/>
    </style:style>
    <style:style style:name="Table18.A" style:family="table-column">
      <style:table-column-properties style:column-width="0.4389in" style:rel-column-width="3640*"/>
    </style:style>
    <style:style style:name="Table18.R" style:family="table-column">
      <style:table-column-properties style:column-width="0.4403in" style:rel-column-width="3655*"/>
    </style:style>
    <style:style style:name="Table18.A1" style:family="table-cell">
      <style:table-cell-properties style:vertical-align="middle" fo:padding="0.0382in" fo:border="0.75pt solid #000000"/>
    </style:style>
    <style:style style:name="Table18.A2" style:family="table-cell">
      <style:table-cell-properties style:vertical-align="middle" fo:padding="0.0382in" fo:border-left="0.75pt solid #000000" fo:border-right="none" fo:border-top="none" fo:border-bottom="0.75pt solid #000000"/>
    </style:style>
    <style:style style:name="Table18.Q2" style:family="table-cell">
      <style:table-cell-properties style:vertical-align="middle" fo:padding="0.0382in" fo:border-left="0.75pt solid #000000" fo:border-right="0.75pt solid #000000" fo:border-top="none" fo:border-bottom="0.75pt solid #000000"/>
    </style:style>
    <style:style style:name="Table18.C3" style:family="table-cell">
      <style:table-cell-properties style:vertical-align="middle" fo:background-color="#dddddd" fo:padding="0.0382in" fo:border-left="0.75pt solid #000000" fo:border-right="none" fo:border-top="none" fo:border-bottom="0.75pt solid #000000">
        <style:background-image/>
      </style:table-cell-properties>
    </style:style>
    <style:style style:name="Table17" style:family="table">
      <style:table-properties style:width="7.9in" table:align="margins"/>
    </style:style>
    <style:style style:name="Table17.A" style:family="table-column">
      <style:table-column-properties style:column-width="7.9in" style:rel-column-width="65535*"/>
    </style:style>
    <style:style style:name="Table17.A1" style:family="table-cell">
      <style:table-cell-properties fo:padding="0.0382in" fo:border="0.5pt solid #000000"/>
    </style:style>
    <style:style style:name="Table20" style:family="table">
      <style:table-properties style:width="7.9in" table:align="margins"/>
    </style:style>
    <style:style style:name="Table20.A" style:family="table-column">
      <style:table-column-properties style:column-width="7.9in" style:rel-column-width="65535*"/>
    </style:style>
    <style:style style:name="Table20.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1.975in" style:rel-column-width="16383*"/>
    </style:style>
    <style:style style:name="Table1.D" style:family="table-column">
      <style:table-column-properties style:column-width="1.975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officeooo:rsid="0148c500" officeooo:paragraph-rsid="001940f9"/>
    </style:style>
    <style:style style:name="P2" style:family="paragraph" style:parent-style-name="Standard">
      <style:text-properties officeooo:paragraph-rsid="001940f9"/>
    </style:style>
    <style:style style:name="P3" style:family="paragraph" style:parent-style-name="Table_20_Contents">
      <style:text-properties fo:color="#127622" loext:opacity="100%" officeooo:paragraph-rsid="001940f9"/>
    </style:style>
    <style:style style:name="P4" style:family="paragraph" style:parent-style-name="Table_20_Contents">
      <style:text-properties officeooo:paragraph-rsid="001940f9"/>
    </style:style>
    <style:style style:name="P5" style:family="paragraph" style:parent-style-name="Standard" style:list-style-name="L1">
      <style:text-properties officeooo:paragraph-rsid="001940f9"/>
    </style:style>
    <style:style style:name="P6" style:family="paragraph" style:parent-style-name="Standard" style:list-style-name="L1">
      <style:text-properties officeooo:rsid="0159c683" officeooo:paragraph-rsid="001940f9"/>
    </style:style>
    <style:style style:name="P7" style:family="paragraph" style:parent-style-name="Standard" style:list-style-name="L1">
      <style:text-properties officeooo:rsid="0149987e" officeooo:paragraph-rsid="001940f9"/>
    </style:style>
    <style:style style:name="P8" style:family="paragraph" style:parent-style-name="Standard">
      <style:text-properties officeooo:rsid="01857558" officeooo:paragraph-rsid="001940f9"/>
    </style:style>
    <style:style style:name="P9" style:family="paragraph" style:parent-style-name="Table_20_Contents">
      <style:paragraph-properties fo:text-align="center" style:justify-single-word="false"/>
      <style:text-properties fo:font-weight="bold" officeooo:rsid="017d68b3" officeooo:paragraph-rsid="001940f9" style:font-weight-asian="bold" style:font-weight-complex="bold"/>
    </style:style>
    <style:style style:name="P10" style:family="paragraph" style:parent-style-name="Table_20_Contents">
      <style:paragraph-properties fo:text-align="center" style:justify-single-word="false"/>
      <style:text-properties officeooo:rsid="0179e681" officeooo:paragraph-rsid="001940f9"/>
    </style:style>
    <style:style style:name="P11" style:family="paragraph" style:parent-style-name="Table_20_Contents">
      <style:paragraph-properties fo:text-align="center" style:justify-single-word="false"/>
      <style:text-properties officeooo:rsid="0178eda3" officeooo:paragraph-rsid="001940f9"/>
    </style:style>
    <style:style style:name="P12" style:family="paragraph" style:parent-style-name="Table_20_Contents">
      <style:paragraph-properties fo:text-align="center" style:justify-single-word="false"/>
      <style:text-properties officeooo:rsid="017ba290" officeooo:paragraph-rsid="001940f9"/>
    </style:style>
    <style:style style:name="P13" style:family="paragraph" style:parent-style-name="Table_20_Contents">
      <style:paragraph-properties fo:text-align="center" style:justify-single-word="false"/>
      <style:text-properties officeooo:rsid="0182a647" officeooo:paragraph-rsid="001940f9"/>
    </style:style>
    <style:style style:name="P14" style:family="paragraph" style:parent-style-name="Table_20_Contents">
      <style:paragraph-properties fo:text-align="center" style:justify-single-word="false"/>
      <style:text-properties officeooo:paragraph-rsid="001940f9"/>
    </style:style>
    <style:style style:name="P15" style:family="paragraph" style:parent-style-name="Table_20_Contents">
      <style:paragraph-properties fo:text-align="center" style:justify-single-word="false"/>
      <style:text-properties officeooo:rsid="0179f777" officeooo:paragraph-rsid="001940f9"/>
    </style:style>
    <style:style style:name="P16" style:family="paragraph" style:parent-style-name="Table_20_Contents">
      <style:paragraph-properties fo:text-align="center" style:justify-single-word="false"/>
      <style:text-properties officeooo:rsid="01a54e98" officeooo:paragraph-rsid="001940f9"/>
    </style:style>
    <style:style style:name="P17" style:family="paragraph" style:parent-style-name="Table_20_Contents">
      <style:paragraph-properties fo:text-align="center" style:justify-single-word="false"/>
      <style:text-properties officeooo:rsid="017e4f98" officeooo:paragraph-rsid="001940f9"/>
    </style:style>
    <style:style style:name="P18" style:family="paragraph" style:parent-style-name="Standard">
      <style:text-properties officeooo:rsid="018e933c" officeooo:paragraph-rsid="001940f9"/>
    </style:style>
    <style:style style:name="P19" style:family="paragraph" style:parent-style-name="Standard">
      <style:paragraph-properties fo:text-align="center" style:justify-single-word="false"/>
      <style:text-properties officeooo:paragraph-rsid="001e873b"/>
    </style:style>
    <style:style style:name="P20" style:family="paragraph" style:parent-style-name="Standard" style:list-style-name="L2">
      <style:text-properties officeooo:rsid="001ff6fd" officeooo:paragraph-rsid="001ff6fd"/>
    </style:style>
    <style:style style:name="P21" style:family="paragraph" style:parent-style-name="Standard" style:list-style-name="L2">
      <style:text-properties officeooo:rsid="00208204" officeooo:paragraph-rsid="00208204"/>
    </style:style>
    <style:style style:name="P22" style:family="paragraph" style:parent-style-name="Standard">
      <style:text-properties officeooo:rsid="00208204" officeooo:paragraph-rsid="00208204"/>
    </style:style>
    <style:style style:name="P23" style:family="paragraph" style:parent-style-name="Standard">
      <style:text-properties officeooo:rsid="00253b4d" officeooo:paragraph-rsid="00253b4d"/>
    </style:style>
    <style:style style:name="P24" style:family="paragraph" style:parent-style-name="Standard">
      <style:text-properties officeooo:rsid="019a6b13" officeooo:paragraph-rsid="001940f9"/>
    </style:style>
    <style:style style:name="P25" style:family="paragraph" style:parent-style-name="Table_20_Contents">
      <style:text-properties fo:color="#127622" loext:opacity="100%" officeooo:paragraph-rsid="0045fc5c"/>
    </style:style>
    <style:style style:name="P26" style:family="paragraph" style:parent-style-name="Table_20_Contents">
      <style:text-properties officeooo:paragraph-rsid="0045fc5c"/>
    </style:style>
    <style:style style:name="P27" style:family="paragraph" style:parent-style-name="Standard" style:list-style-name="L3">
      <style:text-properties officeooo:rsid="002831a3" officeooo:paragraph-rsid="002831a3"/>
    </style:style>
    <style:style style:name="P28" style:family="paragraph" style:parent-style-name="Standard" style:list-style-name="L3">
      <style:text-properties officeooo:rsid="00298f8e" officeooo:paragraph-rsid="00298f8e"/>
    </style:style>
    <style:style style:name="P29" style:family="paragraph" style:parent-style-name="Standard" style:list-style-name="L3">
      <style:text-properties officeooo:rsid="0048a997" officeooo:paragraph-rsid="0048a997"/>
    </style:style>
    <style:style style:name="P30" style:family="paragraph" style:parent-style-name="Standard">
      <style:text-properties officeooo:rsid="00340d96" officeooo:paragraph-rsid="00340d96"/>
    </style:style>
    <style:style style:name="P31" style:family="paragraph" style:parent-style-name="Standard">
      <style:text-properties officeooo:rsid="00366edd" officeooo:paragraph-rsid="00366edd"/>
    </style:style>
    <style:style style:name="P32" style:family="paragraph" style:parent-style-name="Standard">
      <style:paragraph-properties fo:text-align="center" style:justify-single-word="false"/>
      <style:text-properties style:font-name="Gabriela" officeooo:rsid="00604d0c" officeooo:paragraph-rsid="00604d0c"/>
    </style:style>
    <style:style style:name="P33" style:family="paragraph" style:parent-style-name="Table_20_Contents">
      <style:text-properties fo:color="#127622" loext:opacity="100%" officeooo:paragraph-rsid="0048a997"/>
    </style:style>
    <style:style style:name="P34" style:family="paragraph" style:parent-style-name="Table_20_Contents">
      <style:text-properties officeooo:paragraph-rsid="0048a997"/>
    </style:style>
    <style:style style:name="P35" style:family="paragraph" style:parent-style-name="Table_20_Contents">
      <style:text-properties fo:color="#ff0000" loext:opacity="100%" officeooo:paragraph-rsid="0048a997"/>
    </style:style>
    <style:style style:name="P36" style:family="paragraph" style:parent-style-name="Standard">
      <style:text-properties officeooo:rsid="019a6b13" officeooo:paragraph-rsid="0048a997"/>
    </style:style>
    <style:style style:name="P37" style:family="paragraph" style:parent-style-name="Standard">
      <style:text-properties officeooo:rsid="004f826b" officeooo:paragraph-rsid="0058a66e"/>
    </style:style>
    <style:style style:name="P38" style:family="paragraph" style:parent-style-name="Standard" style:list-style-name="L4">
      <style:text-properties officeooo:paragraph-rsid="0058a66e"/>
    </style:style>
    <style:style style:name="P39" style:family="paragraph" style:parent-style-name="Standard" style:list-style-name="L4">
      <style:text-properties officeooo:paragraph-rsid="005ab87b"/>
    </style:style>
    <style:style style:name="P40" style:family="paragraph" style:parent-style-name="Standard" style:list-style-name="L4">
      <style:text-properties officeooo:rsid="0054d6be" officeooo:paragraph-rsid="005ab87b"/>
    </style:style>
    <style:style style:name="P41" style:family="paragraph" style:parent-style-name="Standard" style:list-style-name="L4">
      <style:text-properties officeooo:rsid="006f77b9" officeooo:paragraph-rsid="006f77b9"/>
    </style:style>
    <style:style style:name="P42" style:family="paragraph" style:parent-style-name="Standard">
      <style:text-properties officeooo:rsid="0054d6be" officeooo:paragraph-rsid="005ab87b"/>
    </style:style>
    <style:style style:name="P43" style:family="paragraph" style:parent-style-name="Table_20_Contents">
      <style:text-properties officeooo:paragraph-rsid="00604d0c"/>
    </style:style>
    <style:style style:name="P44" style:family="paragraph" style:parent-style-name="Standard">
      <style:paragraph-properties fo:text-align="center" style:justify-single-word="false"/>
      <style:text-properties fo:color="#ff0000" loext:opacity="100%" officeooo:rsid="0054d6be" officeooo:paragraph-rsid="005ab87b"/>
    </style:style>
    <style:style style:name="T1" style:family="text">
      <style:text-properties officeooo:rsid="014bb5e0"/>
    </style:style>
    <style:style style:name="T2" style:family="text">
      <style:text-properties style:text-position="super 58%" officeooo:rsid="014bb5e0"/>
    </style:style>
    <style:style style:name="T3" style:family="text">
      <style:text-properties fo:background-color="#ffff00" loext:char-shading-value="0"/>
    </style:style>
    <style:style style:name="T4" style:family="text">
      <style:text-properties style:use-window-font-color="true" loext:opacity="0%" fo:background-color="#ffff00" loext:char-shading-value="0"/>
    </style:style>
    <style:style style:name="T5" style:family="text">
      <style:text-properties fo:color="#ff0000" loext:opacity="100%" fo:background-color="#ffff00" loext:char-shading-value="0"/>
    </style:style>
    <style:style style:name="T6" style:family="text">
      <style:text-properties style:text-position="super 58%" officeooo:rsid="0181e738"/>
    </style:style>
    <style:style style:name="T7" style:family="text">
      <style:text-properties officeooo:rsid="0181e738"/>
    </style:style>
    <style:style style:name="T8" style:family="text">
      <style:text-properties fo:background-color="#fff5ce" loext:char-shading-value="0"/>
    </style:style>
    <style:style style:name="T9" style:family="text">
      <style:text-properties style:text-position="super 58%"/>
    </style:style>
    <style:style style:name="T10" style:family="text">
      <style:text-properties fo:font-weight="bold" fo:background-color="#ffff00" loext:char-shading-value="0" style:font-weight-asian="bold" style:font-weight-complex="bold"/>
    </style:style>
    <style:style style:name="T11" style:family="text">
      <style:text-properties officeooo:rsid="0149987e"/>
    </style:style>
    <style:style style:name="T12" style:family="text">
      <style:text-properties fo:font-style="italic" officeooo:rsid="0159c683" style:font-style-asian="italic" style:font-style-complex="italic"/>
    </style:style>
    <style:style style:name="T13" style:family="text">
      <style:text-properties officeooo:rsid="0159c683"/>
    </style:style>
    <style:style style:name="T14" style:family="text">
      <style:text-properties officeooo:rsid="01602112"/>
    </style:style>
    <style:style style:name="T15" style:family="text">
      <style:text-properties officeooo:rsid="015ff206"/>
    </style:style>
    <style:style style:name="T16" style:family="text">
      <style:text-properties style:font-name="Liberation Sans" officeooo:rsid="015ff206" style:font-name-complex="Liberation Sans"/>
    </style:style>
    <style:style style:name="T17" style:family="text">
      <style:text-properties style:font-name="Liberation Sans" officeooo:rsid="0159c683" style:font-name-complex="Liberation Sans"/>
    </style:style>
    <style:style style:name="T18" style:family="text">
      <style:text-properties officeooo:rsid="01614838"/>
    </style:style>
    <style:style style:name="T19" style:family="text">
      <style:text-properties fo:font-style="italic" officeooo:rsid="015ad64f" style:font-style-asian="italic" style:font-style-complex="italic"/>
    </style:style>
    <style:style style:name="T20" style:family="text">
      <style:text-properties officeooo:rsid="015ad64f"/>
    </style:style>
    <style:style style:name="T21" style:family="text">
      <style:text-properties style:text-position="super 58%" officeooo:rsid="0159c683"/>
    </style:style>
    <style:style style:name="T22" style:family="text">
      <style:text-properties officeooo:rsid="01a54f32"/>
    </style:style>
    <style:style style:name="T23" style:family="text">
      <style:text-properties officeooo:rsid="003d3bd2"/>
    </style:style>
    <style:style style:name="T24" style:family="text">
      <style:text-properties officeooo:rsid="0179f777"/>
    </style:style>
    <style:style style:name="T25" style:family="text">
      <style:text-properties style:text-position="super 58%" officeooo:rsid="0179f777"/>
    </style:style>
    <style:style style:name="T26" style:family="text">
      <style:text-properties officeooo:rsid="01840ca5"/>
    </style:style>
    <style:style style:name="T27" style:family="text">
      <style:text-properties officeooo:rsid="003c7018"/>
    </style:style>
    <style:style style:name="T28" style:family="text">
      <style:text-properties officeooo:rsid="019050bc"/>
    </style:style>
    <style:style style:name="T29" style:family="text">
      <style:text-properties style:text-position="super 58%" officeooo:rsid="019050bc"/>
    </style:style>
    <style:style style:name="T30" style:family="text">
      <style:text-properties officeooo:rsid="001d276b"/>
    </style:style>
    <style:style style:name="T31" style:family="text">
      <style:text-properties officeooo:rsid="003b73b9"/>
    </style:style>
    <style:style style:name="T32" style:family="text">
      <style:text-properties style:text-position="super 58%" officeooo:rsid="003b73b9"/>
    </style:style>
    <style:style style:name="T33" style:family="text">
      <style:text-properties style:font-name="Gabriela" officeooo:rsid="001e873b"/>
    </style:style>
    <style:style style:name="T34" style:family="text">
      <style:text-properties fo:color="#ff0000" loext:opacity="100%"/>
    </style:style>
    <style:style style:name="T35" style:family="text">
      <style:text-properties fo:color="#127622" loext:opacity="100%"/>
    </style:style>
    <style:style style:name="T36" style:family="text">
      <style:text-properties fo:color="#127622" loext:opacity="100%" officeooo:rsid="0026c45f"/>
    </style:style>
    <style:style style:name="T37" style:family="text">
      <style:text-properties officeooo:rsid="0026c45f"/>
    </style:style>
    <style:style style:name="T38" style:family="text">
      <style:text-properties fo:color="#ff0000" loext:opacity="100%" officeooo:rsid="003286e2"/>
    </style:style>
    <style:style style:name="T39" style:family="text">
      <style:text-properties officeooo:rsid="00253b4d"/>
    </style:style>
    <style:style style:name="T40" style:family="text">
      <style:text-properties fo:font-weight="bold" officeooo:rsid="00253b4d" style:font-weight-asian="bold" style:font-weight-complex="bold"/>
    </style:style>
    <style:style style:name="T41" style:family="text">
      <style:text-properties officeooo:rsid="00272b27"/>
    </style:style>
    <style:style style:name="T42" style:family="text">
      <style:text-properties fo:color="#127622" loext:opacity="100%" officeooo:rsid="00272b27"/>
    </style:style>
    <style:style style:name="T43" style:family="text">
      <style:text-properties officeooo:rsid="002f99ad"/>
    </style:style>
    <style:style style:name="T44" style:family="text">
      <style:text-properties officeooo:rsid="004c3bb8"/>
    </style:style>
    <style:style style:name="T45" style:family="text">
      <style:text-properties fo:background-color="#dee6ef" loext:char-shading-value="0"/>
    </style:style>
    <style:style style:name="T46" style:family="text">
      <style:text-properties officeooo:rsid="0050e9df"/>
    </style:style>
    <style:style style:name="T47" style:family="text">
      <style:text-properties fo:color="#127622" loext:opacity="100%" officeooo:rsid="0050e9df"/>
    </style:style>
    <style:style style:name="T48" style:family="text">
      <style:text-properties officeooo:rsid="00533faf"/>
    </style:style>
    <style:style style:name="T49" style:family="text">
      <style:text-properties fo:color="#127622" loext:opacity="100%" officeooo:rsid="00533faf"/>
    </style:style>
    <style:style style:name="T50" style:family="text">
      <style:text-properties officeooo:rsid="006d86ec"/>
    </style:style>
    <style:style style:name="T51" style:family="text">
      <style:text-properties style:text-position="super 58%" officeooo:rsid="0050e9df"/>
    </style:style>
    <style:style style:name="T52" style:family="text">
      <style:text-properties officeooo:rsid="0058a66e"/>
    </style:style>
    <style:style style:name="T53" style:family="text">
      <style:text-properties officeooo:rsid="006e88d8"/>
    </style:style>
    <style:style style:name="T54" style:family="text">
      <style:text-properties officeooo:rsid="005aa465"/>
    </style:style>
    <style:style style:name="T55" style:family="text">
      <style:text-properties officeooo:rsid="005ab87b"/>
    </style:style>
    <style:style style:name="T56" style:family="text">
      <style:text-properties officeooo:rsid="00650c12"/>
    </style:style>
    <style:style style:name="T57" style:family="text">
      <style:text-properties officeooo:rsid="0066775d"/>
    </style:style>
    <style:style style:name="T58" style:family="text">
      <style:text-properties fo:color="#127622" loext:opacity="100%" officeooo:rsid="005c9bd3"/>
    </style:style>
    <style:style style:name="T59" style:family="text">
      <style:text-properties fo:color="#127622" loext:opacity="100%" officeooo:rsid="00604d0c"/>
    </style:style>
    <style:style style:name="T60" style:family="text">
      <style:text-properties fo:color="#127622" loext:opacity="100%" officeooo:rsid="005e56fc"/>
    </style:style>
    <style:style style:name="T61" style:family="text">
      <style:text-properties fo:color="#ff8000" loext:opacity="100%" fo:background-color="#ffff00" loext:char-shading-value="0"/>
    </style:style>
    <style:style style:name="T62"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feast of unleavened bread</text:p>
      <text:p text:style-name="P2"/>
      <table:table table:name="Table15" table:style-name="Table15">
        <table:table-column table:style-name="Table15.A"/>
        <table:table-row>
          <table:table-cell table:style-name="Table15.A1" office:value-type="string">
            <text:p text:style-name="P3">Exodus 12:3,<text:span text:style-name="T1">6</text:span></text:p>
            <text:p text:style-name="P4"><text:span text:style-name="T2">3</text:span><text:span text:style-name="T1"> </text:span>Speak ye unto all the congregation of Israel, saying, <text:span text:style-name="T3">In</text:span> the <text:span text:style-name="T3">tenth day</text:span> of this month they shall take to them every man a lamb, according to the house of their fathers, a lamb for an house:</text:p>
            <text:p text:style-name="P4"><text:span text:style-name="T2">6</text:span><text:span text:style-name="T1"> </text:span>And ye shall keep it up until the <text:span text:style-name="T4">fourteenth day</text:span> of the same month: and the whole assembly of the congregation of Israel shall <text:span text:style-name="T3">kill it </text:span><text:span text:style-name="T5">in the evening</text:span>.</text:p>
            <text:p text:style-name="P4"><text:span text:style-name="T6">8</text:span><text:span text:style-name="T7"> </text:span>And they shall eat the flesh <text:span text:style-name="T3">in that night</text:span>, roast with fire, and <text:span text:style-name="T8">unleavened bread</text:span>; and with bitter herbs they shall eat it.</text:p>
            <text:p text:style-name="P4"/>
            <text:p text:style-name="P3">Exodus 12:15-19</text:p>
            <text:p text:style-name="P4"><text:span text:style-name="T9">15</text:span> <text:span text:style-name="T3">Seven days</text:span> shall ye eat <text:span text:style-name="T8">unleavened bread</text:span>; even <text:span text:style-name="T3">the first day</text:span> ye shall put away leaven out of your houses: for whosoever eateth leavened bread from <text:span text:style-name="T3">the first day until the seventh day</text:span>, that soul shall be cut off from Israel.</text:p>
            <text:p text:style-name="P4"><text:span text:style-name="T9">16</text:span> And <text:span text:style-name="T10">in</text:span><text:span text:style-name="T3"> the first day</text:span> there shall be an holy convocation, and <text:span text:style-name="T10">in</text:span><text:span text:style-name="T3"> the seventh day</text:span> there shall be an holy convocation to you; no manner of work shall be done in them, save that which every man must eat, that only may be done of you.</text:p>
            <text:p text:style-name="P4"><text:span text:style-name="T9">17</text:span> And ye shall observe <text:span text:style-name="T8">the feast of unleavened bread</text:span>; for in this selfsame day have I brought your armies out of the land of Egypt: therefore shall ye observe this day in your generations by an ordinance for ever.</text:p>
            <text:p text:style-name="P4"><text:span text:style-name="T9">18</text:span> In the first month, <text:span text:style-name="T10">on</text:span><text:span text:style-name="T3"> the fourteenth day</text:span> of the month at even, ye shall eat unleavened bread, <text:span text:style-name="T10">until</text:span><text:span text:style-name="T3"> the one and twentieth day</text:span> of the month <text:span text:style-name="T3">at even</text:span>.</text:p>
            <text:p text:style-name="P4"><text:span text:style-name="T9">19</text:span> <text:span text:style-name="T3">Seven days</text:span> shall there be no leaven found in your houses: for whosoever eateth that which is leavened, even that soul shall be cut off from the congregation of Israel, whether he be a stranger, or born in the land.</text:p>
          </table:table-cell>
        </table:table-row>
      </table:table>
      <text:list text:style-name="L1">
        <text:list-item>
          <text:p text:style-name="P5"><text:span text:style-name="T11">“</text:span><text:span text:style-name="T12">in the evening</text:span><text:span text:style-name="T13">” in the 1524 </text:span><text:span text:style-name="T14">Bomberg </text:span><text:span text:style-name="T13">MT Hebrew </text:span><text:span text:style-name="T15">(</text:span><text:span text:style-name="T16">בֵּין הָעַרְבַּיִם) </text:span><text:span text:style-name="T13">reads “between the two eve</text:span><text:span text:style-name="T17">nings”.</text:span></text:p>
        </text:list-item>
        <text:list-item>
          <text:p text:style-name="P6">The first evening is afternoon. The second evening is the beginning of the next day <text:span text:style-name="T18">(sunset)</text:span>.</text:p>
        </text:list-item>
        <text:list-item>
          <text:p text:style-name="P7"><text:span text:style-name="T13">Otherwise, “</text:span><text:span text:style-name="T19">in the evening</text:span><text:span text:style-name="T20">”</text:span><text:span text:style-name="T13"> would be the 15</text:span><text:span text:style-name="T21">th</text:span><text:span text:style-name="T13"> day.</text:span></text:p>
        </text:list-item>
      </text:list>
      <text:p text:style-name="P2"/>
      <table:table table:name="Table16" table:style-name="Table16">
        <table:table-column table:style-name="Table16.A"/>
        <table:table-row>
          <table:table-cell table:style-name="Table16.A1" office:value-type="string">
            <text:p text:style-name="P3">Leviticus 23:4-8</text:p>
            <text:p text:style-name="P4"><text:span text:style-name="T9">4</text:span> These are the feasts of the LORD, even holy convocations, which ye shall proclaim in their seasons.</text:p>
            <text:p text:style-name="P4"><text:span text:style-name="T9">5</text:span> <text:span text:style-name="T10">In</text:span><text:span text:style-name="T3"> the fourteenth day</text:span> of the first month at even is the LORD'S passover.</text:p>
            <text:p text:style-name="P4"><text:span text:style-name="T9">6</text:span> And <text:span text:style-name="T10">on</text:span><text:span text:style-name="T3"> the fifteenth day</text:span> of the same month is <text:span text:style-name="T8">the feast of unleavened bread</text:span> unto the LORD: <text:span text:style-name="T3">seven days</text:span> ye must eat unleavened bread.</text:p>
            <text:p text:style-name="P4"><text:span text:style-name="T9">7</text:span> <text:span text:style-name="T10">In</text:span><text:span text:style-name="T3"> the first day</text:span> ye shall have an holy convocation: ye shall do no servile work therein.</text:p>
            <text:p text:style-name="P4"><text:span text:style-name="T9">8</text:span> But ye shall offer an offering made by fire unto the LORD <text:span text:style-name="T3">seven days</text:span>: <text:span text:style-name="T10">in</text:span><text:span text:style-name="T3"> the seventh day</text:span> is an holy convocation: ye shall do no servile work therein.</text:p>
          </table:table-cell>
        </table:table-row>
      </table:table>
      <text:p text:style-name="P2"/>
      <text:p text:style-name="P8">E = evening, M = morning, HC = holy convocation, <text:span text:style-name="T22">LK = lamb killed, </text:span>LE = lamb eaten, <text:span text:style-name="T23">NL = leaven is to be removed this day</text:span></text:p>
      <text:p text:style-name="P2"/>
      <table:table table:name="Table18" table:style-name="Table18">
        <table:table-column table:style-name="Table18.A" table:number-columns-repeated="17"/>
        <table:table-column table:style-name="Table18.R"/>
        <table:table-row>
          <table:table-cell table:style-name="Table18.A1" table:number-columns-spanned="18" office:value-type="string">
            <text:p text:style-name="P9">First Mon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A2" table:number-columns-spanned="2" office:value-type="string">
            <text:p text:style-name="P10">14<text:span text:style-name="T9">th</text:span></text:p>
          </table:table-cell>
          <table:covered-table-cell/>
          <table:table-cell table:style-name="Table18.A2" table:number-columns-spanned="2" office:value-type="string">
            <text:p text:style-name="P10">15<text:span text:style-name="T9">th</text:span></text:p>
          </table:table-cell>
          <table:covered-table-cell/>
          <table:table-cell table:style-name="Table18.A2" table:number-columns-spanned="2" office:value-type="string">
            <text:p text:style-name="P10">16<text:span text:style-name="T9">th</text:span></text:p>
          </table:table-cell>
          <table:covered-table-cell/>
          <table:table-cell table:style-name="Table18.A2" table:number-columns-spanned="2" office:value-type="string">
            <text:p text:style-name="P10">17<text:span text:style-name="T9">th</text:span></text:p>
          </table:table-cell>
          <table:covered-table-cell/>
          <table:table-cell table:style-name="Table18.A2" table:number-columns-spanned="2" office:value-type="string">
            <text:p text:style-name="P10">18<text:span text:style-name="T9">th</text:span></text:p>
          </table:table-cell>
          <table:covered-table-cell/>
          <table:table-cell table:style-name="Table18.A2" table:number-columns-spanned="2" office:value-type="string">
            <text:p text:style-name="P10">19<text:span text:style-name="T9">th</text:span></text:p>
          </table:table-cell>
          <table:covered-table-cell/>
          <table:table-cell table:style-name="Table18.A2" table:number-columns-spanned="2" office:value-type="string">
            <text:p text:style-name="P10">20<text:span text:style-name="T9">th</text:span></text:p>
          </table:table-cell>
          <table:covered-table-cell/>
          <table:table-cell table:style-name="Table18.A2" table:number-columns-spanned="2" office:value-type="string">
            <text:p text:style-name="P10">21<text:span text:style-name="T9">st</text:span></text:p>
          </table:table-cell>
          <table:covered-table-cell/>
          <table:table-cell table:style-name="Table18.Q2" table:number-columns-spanned="2" office:value-type="string">
            <text:p text:style-name="P10">22<text:span text:style-name="T9">nd</text:span></text:p>
          </table:table-cell>
          <table:covered-table-cell/>
        </table:table-row>
        <table:table-row>
          <table:table-cell table:style-name="Table18.A2" office:value-type="string">
            <text:p text:style-name="P11">E</text:p>
          </table:table-cell>
          <table:table-cell table:style-name="Table18.A2" office:value-type="string">
            <text:p text:style-name="P11">M</text:p>
          </table:table-cell>
          <table:table-cell table:style-name="Table18.C3" office:value-type="string">
            <text:p text:style-name="P11">E</text:p>
          </table:table-cell>
          <table:table-cell table:style-name="Table18.C3" office:value-type="string">
            <text:p text:style-name="P11">M</text:p>
          </table:table-cell>
          <table:table-cell table:style-name="Table18.C3" office:value-type="string">
            <text:p text:style-name="P11">E</text:p>
          </table:table-cell>
          <table:table-cell table:style-name="Table18.C3" office:value-type="string">
            <text:p text:style-name="P11">M</text:p>
          </table:table-cell>
          <table:table-cell table:style-name="Table18.C3" office:value-type="string">
            <text:p text:style-name="P11">E</text:p>
          </table:table-cell>
          <table:table-cell table:style-name="Table18.C3" office:value-type="string">
            <text:p text:style-name="P11">M</text:p>
          </table:table-cell>
          <table:table-cell table:style-name="Table18.C3" office:value-type="string">
            <text:p text:style-name="P11">E</text:p>
          </table:table-cell>
          <table:table-cell table:style-name="Table18.C3" office:value-type="string">
            <text:p text:style-name="P11">M</text:p>
          </table:table-cell>
          <table:table-cell table:style-name="Table18.C3" office:value-type="string">
            <text:p text:style-name="P11">E</text:p>
          </table:table-cell>
          <table:table-cell table:style-name="Table18.C3" office:value-type="string">
            <text:p text:style-name="P11">M</text:p>
          </table:table-cell>
          <table:table-cell table:style-name="Table18.C3" office:value-type="string">
            <text:p text:style-name="P11">E</text:p>
          </table:table-cell>
          <table:table-cell table:style-name="Table18.C3" office:value-type="string">
            <text:p text:style-name="P11">M</text:p>
          </table:table-cell>
          <table:table-cell table:style-name="Table18.C3" office:value-type="string">
            <text:p text:style-name="P11">E</text:p>
          </table:table-cell>
          <table:table-cell table:style-name="Table18.C3" office:value-type="string">
            <text:p text:style-name="P11">M</text:p>
          </table:table-cell>
          <table:table-cell table:style-name="Table18.A2" office:value-type="string">
            <text:p text:style-name="P11">E</text:p>
          </table:table-cell>
          <table:table-cell table:style-name="Table18.Q2" office:value-type="string">
            <text:p text:style-name="P11">M</text:p>
          </table:table-cell>
        </table:table-row>
        <table:table-row>
          <table:table-cell table:style-name="Table18.A2" table:number-columns-spanned="2" office:value-type="string">
            <text:p text:style-name="P12"/>
          </table:table-cell>
          <table:covered-table-cell/>
          <table:table-cell table:style-name="Table18.C3" table:number-columns-spanned="14" office:value-type="string">
            <text:p text:style-name="P13">Feast of unleavened bre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2" table:number-columns-spanned="2" office:value-type="string">
            <text:p text:style-name="P14"/>
          </table:table-cell>
          <table:covered-table-cell/>
        </table:table-row>
        <table:table-row>
          <table:table-cell table:style-name="Table18.A2" table:number-columns-spanned="2" office:value-type="string">
            <text:p text:style-name="P12">Passover</text:p>
          </table:table-cell>
          <table:covered-table-cell/>
          <table:table-cell table:style-name="Table18.A2" table:number-columns-spanned="2" office:value-type="string">
            <text:p text:style-name="P14"><text:span text:style-name="T24">1</text:span><text:span text:style-name="T25">st</text:span></text:p>
          </table:table-cell>
          <table:covered-table-cell/>
          <table:table-cell table:style-name="Table18.A2" table:number-columns-spanned="2" office:value-type="string">
            <text:p text:style-name="P15">2<text:span text:style-name="T9">nd</text:span></text:p>
          </table:table-cell>
          <table:covered-table-cell/>
          <table:table-cell table:style-name="Table18.A2" table:number-columns-spanned="2" office:value-type="string">
            <text:p text:style-name="P15">3<text:span text:style-name="T9">rd</text:span></text:p>
          </table:table-cell>
          <table:covered-table-cell/>
          <table:table-cell table:style-name="Table18.A2" table:number-columns-spanned="2" office:value-type="string">
            <text:p text:style-name="P15">4<text:span text:style-name="T9">th</text:span></text:p>
          </table:table-cell>
          <table:covered-table-cell/>
          <table:table-cell table:style-name="Table18.A2" table:number-columns-spanned="2" office:value-type="string">
            <text:p text:style-name="P15">5<text:span text:style-name="T9">th</text:span></text:p>
          </table:table-cell>
          <table:covered-table-cell/>
          <table:table-cell table:style-name="Table18.A2" table:number-columns-spanned="2" office:value-type="string">
            <text:p text:style-name="P15">6<text:span text:style-name="T9">th</text:span></text:p>
          </table:table-cell>
          <table:covered-table-cell/>
          <table:table-cell table:style-name="Table18.A2" table:number-columns-spanned="2" office:value-type="string">
            <text:p text:style-name="P15">7<text:span text:style-name="T9">th</text:span></text:p>
          </table:table-cell>
          <table:covered-table-cell/>
          <table:table-cell table:style-name="Table18.Q2" table:number-columns-spanned="2" office:value-type="string">
            <text:p text:style-name="P14"/>
          </table:table-cell>
          <table:covered-table-cell/>
        </table:table-row>
        <table:table-row>
          <table:table-cell table:style-name="Table18.A2" table:number-columns-spanned="2" office:value-type="string">
            <text:p text:style-name="P16">LK</text:p>
          </table:table-cell>
          <table:covered-table-cell/>
          <table:table-cell table:style-name="Table18.A2" table:number-columns-spanned="2" office:value-type="string">
            <text:p text:style-name="P17">HC, <text:span text:style-name="T26">LE, </text:span><text:span text:style-name="T27">NL</text:span></text:p>
          </table:table-cell>
          <table:covered-table-cell/>
          <table:table-cell table:style-name="Table18.A2" table:number-columns-spanned="2" office:value-type="string">
            <text:p text:style-name="P14"/>
          </table:table-cell>
          <table:covered-table-cell/>
          <table:table-cell table:style-name="Table18.A2" table:number-columns-spanned="2" office:value-type="string">
            <text:p text:style-name="Standard"/>
          </table:table-cell>
          <table:covered-table-cell/>
          <table:table-cell table:style-name="Table18.A2" table:number-columns-spanned="2" office:value-type="string">
            <text:p text:style-name="Standard"/>
          </table:table-cell>
          <table:covered-table-cell/>
          <table:table-cell table:style-name="Table18.A2" table:number-columns-spanned="2" office:value-type="string">
            <text:p text:style-name="Standard"/>
          </table:table-cell>
          <table:covered-table-cell/>
          <table:table-cell table:style-name="Table18.A2" table:number-columns-spanned="2" office:value-type="string">
            <text:p text:style-name="Standard"/>
          </table:table-cell>
          <table:covered-table-cell/>
          <table:table-cell table:style-name="Table18.A2" table:number-columns-spanned="2" office:value-type="string">
            <text:p text:style-name="P17">HC</text:p>
          </table:table-cell>
          <table:covered-table-cell/>
          <table:table-cell table:style-name="Table18.Q2" table:number-columns-spanned="2" office:value-type="string">
            <text:p text:style-name="P14"/>
          </table:table-cell>
          <table:covered-table-cell/>
        </table:table-row>
      </table:table>
      <text:p text:style-name="P2"/>
      <text:p text:style-name="P18">NOTE: the passover lamb is <text:span text:style-name="T28">slain on the 14</text:span><text:span text:style-name="T29">th</text:span><text:span text:style-name="T28"> </text:span><text:span text:style-name="T30">during the day</text:span><text:span text:style-name="T28"> and then eaten</text:span> very early on the first day of unleavened bread <text:span text:style-name="T30">(after sunset; </text:span><text:span text:style-name="T31">the 15</text:span><text:span text:style-name="T32">th</text:span><text:span text:style-name="T30">).</text:span></text:p>
      <text:p text:style-name="P19"><text:soft-page-break/><text:span text:style-name="T33">Time travel?</text:span></text:p>
      <text:p text:style-name="P2"/>
      <table:table table:name="Table17" table:style-name="Table17">
        <table:table-column table:style-name="Table17.A"/>
        <table:table-row>
          <table:table-cell table:style-name="Table17.A1" office:value-type="string">
            <text:p text:style-name="P3">Matthew 26:17-21</text:p>
            <text:p text:style-name="P4"><text:span text:style-name="T9">17</text:span> Now the <text:span text:style-name="T3">first day of the feast of unleavened bread</text:span> the disciples came to Jesus, saying unto him, Where wilt thou that we prepare for thee to eat the passover?</text:p>
            <text:p text:style-name="P4"><text:span text:style-name="T9">18</text:span> And he said, <text:span text:style-name="T34">Go into the city to such a man, and say unto him, The Master saith, My time is at hand; I will keep the passover at thy house with my disciples.</text:span></text:p>
            <text:p text:style-name="P4"><text:span text:style-name="T9">19</text:span> And the disciples did as Jesus had appointed them; and they made ready the passover.</text:p>
            <text:p text:style-name="P4"><text:span text:style-name="T9">20</text:span> Now when <text:span text:style-name="T3">the even</text:span> was come, he sat down with the twelve.</text:p>
            <text:p text:style-name="P4"><text:span text:style-name="T9">21</text:span> And as they did <text:span text:style-name="T3">eat</text:span>, he said, Verily I say unto you, that one of you shall betray me.</text:p>
          </table:table-cell>
        </table:table-row>
      </table:table>
      <text:list text:style-name="L2">
        <text:list-item>
          <text:p text:style-name="P20">On the first day of the feast of unleavened bread which is the same as the 15<text:span text:style-name="T9">th</text:span> day of the month (<text:span text:style-name="T35">Exodus 12:17,18</text:span>) the disciples came and asked Jesus where they should prepare the passover (which was to be done on the 14<text:span text:style-name="T9">th</text:span> day; <text:span text:style-name="T36">Exodus 12:6</text:span>).</text:p>
        </text:list-item>
        <text:list-item>
          <text:p text:style-name="P20">Jesus <text:span text:style-name="T37">rebuked</text:span> them <text:span text:style-name="T37">saying</text:span> “<text:span text:style-name="T38">sorry fellas, </text:span><text:span text:style-name="T34">ya’ll are a day late and a dollar short</text:span>”.</text:p>
        </text:list-item>
        <text:list-item>
          <text:p text:style-name="P21">Not exactly. <text:span text:style-name="T39">Which is </text:span><text:span text:style-name="T40">very</text:span><text:span text:style-name="T39"> interesting. </text:span><text:span text:style-name="T41">Did the disciples and Jesus travel back in time to prepare the passover and then eat it (v</text:span><text:span text:style-name="T42">18-21</text:span><text:span text:style-name="T41">)?</text:span></text:p>
        </text:list-item>
      </text:list>
      <text:p text:style-name="P22"/>
      <text:p text:style-name="P23">If we look at the parallel passages in <text:span text:style-name="T35">Mark</text:span> and <text:span text:style-name="T35">Luke</text:span> we see:</text:p>
      <text:p text:style-name="P24"/>
      <table:table table:name="Table20" table:style-name="Table20">
        <table:table-column table:style-name="Table20.A"/>
        <table:table-row>
          <table:table-cell table:style-name="Table20.A1" office:value-type="string">
            <text:p text:style-name="P3">Mark 14:12</text:p>
            <text:p text:style-name="P4">And the <text:span text:style-name="T3">first day of unleavened bread</text:span>, <text:span text:style-name="T3">when they killed the passover</text:span>, his disciples said unto him, Where wilt thou that we go and prepare that thou mayest eat the passover?</text:p>
            <text:p text:style-name="P4"/>
            <text:p text:style-name="P25">Luke 22:7</text:p>
            <text:p text:style-name="P26">Then came <text:span text:style-name="T3">the day of unleavened bread</text:span>, <text:span text:style-name="T3">when the passover must be killed</text:span>.</text:p>
          </table:table-cell>
        </table:table-row>
      </table:table>
      <text:list text:style-name="L3">
        <text:list-item>
          <text:p text:style-name="P27">But we know full well that the law states the passover lamb <text:span text:style-name="T43">is to</text:span> be killed on the 14<text:span text:style-name="T9">th</text:span> day at even (<text:span text:style-name="T35">Exodus 12:6</text:span>).</text:p>
        </text:list-item>
        <text:list-item>
          <text:p text:style-name="P28">Here we are plainly told that the first day of unleavened bread is the same day as the day the passover is killed.</text:p>
        </text:list-item>
        <text:list-item>
          <text:p text:style-name="P29">Evidently <text:span text:style-name="T35">Matthew</text:span>, <text:span text:style-name="T35">Mark</text:span>, and <text:span text:style-name="T35">Luke</text:span> all use the same Jewish colloquialism where all 8 days are referred to as “the feast of unleavened bread” instead of “the passover” (1 day) and “the feast of unleavened bread” (7 days) separately like in the OT.</text:p>
        </text:list-item>
      </text:list>
      <text:p text:style-name="P24"/>
      <text:p text:style-name="P30"><text:span text:style-name="T44">The historian </text:span>Flavius Josephus <text:span text:style-name="T44">documented this colloquialism </text:span>in “The Antiquities of the Jews”, Book 2, Chapter 15, Paragraph 1:</text:p>
      <text:p text:style-name="P30"/>
      <table:table table:name="Table2" table:style-name="Table2">
        <table:table-column table:style-name="Table2.A"/>
        <table:table-row>
          <table:table-cell table:style-name="Table2.A1" office:value-type="string">
            <text:p text:style-name="Table_20_Contents">1. So the Hebrews went out of Egypt, while the Egyptians wept, and repented that they had treated them so hardly. - Now they took their journey by Letopolis, a place at that time deserted, but where Babylon was built afterwards, when Cambyses laid Egypt waste: but as they went away hastily, on the third day they came to a place called Beelzephon, on the Red Sea; and when they had no food out of the land, because it was a desert, they eat of loaves kneaded of flour, only warmed by a gentle heat; and this food they made use of for thirty days; for what they brought with them out of Egypt would not suffice them any longer time; and this only while they dispensed it to each person, to use so much only as would serve for necessity, but not for satiety. Whence it is that, in memory of the want we were then in, we keep a feast for <text:span text:style-name="T3">eight days</text:span>, which is called <text:span text:style-name="T3">the feast of unleavened bread</text:span>. Now the entire multitude of those that went out, including the women and children, was not easy to be numbered, but those that were of an age fit for war, were six hundred thousand.</text:p>
          </table:table-cell>
        </table:table-row>
      </table:table>
      <text:p text:style-name="P30"/>
      <text:p text:style-name="P31"/>
      <text:p text:style-name="P31"/>
      <text:p text:style-name="P31"/>
      <text:p text:style-name="P31"/>
      <text:p text:style-name="P32"><text:soft-page-break/>A day to be remembered</text:p>
      <text:p text:style-name="P31"/>
      <table:table table:name="Table1" table:style-name="Table1">
        <table:table-column table:style-name="Table1.A" table:number-columns-repeated="3"/>
        <table:table-column table:style-name="Table1.D"/>
        <table:table-row>
          <table:table-cell table:style-name="Table1.A1" office:value-type="string">
            <text:p text:style-name="P33">Matthew 26:16-18</text:p>
            <text:p text:style-name="P34"><text:span text:style-name="T9">16</text:span> And from that time he sought opportunity to betray him.</text:p>
            <text:p text:style-name="P34"><text:span text:style-name="T9">17</text:span> Now <text:span text:style-name="T8">the first day of the feast of unleavened</text:span> <text:span text:style-name="T8">bread</text:span> the disciples came to Jesus, saying unto him, Where wilt thou that we prepare for thee to eat the passover?</text:p>
            <text:p text:style-name="P34"><text:span text:style-name="T9">18</text:span> And he said, <text:span text:style-name="T34">Go into the city to such a man, and say unto him, The Master saith, My time is at hand; I will keep the passover at thy house with my disciples.</text:span></text:p>
          </table:table-cell>
          <table:table-cell table:style-name="Table1.A1" office:value-type="string">
            <text:p text:style-name="P33">Mark 14:11-13</text:p>
            <text:p text:style-name="P34"><text:span text:style-name="T9">11</text:span> And when they heard it, they were glad, and promised to give him money. And he sought how he might conveniently betray him.</text:p>
            <text:p text:style-name="P34"><text:span text:style-name="T9">12</text:span> And <text:span text:style-name="T8">the first day of unleavened bread, when they killed the passover</text:span>, his disciples said unto him, Where wilt thou that we go and prepare that thou mayest eat the passover?</text:p>
            <text:p text:style-name="P34"><text:span text:style-name="T9">13</text:span> And he sendeth forth <text:span text:style-name="T45">two</text:span> of his disciples, and saith unto them, <text:span text:style-name="T34">Go ye into the city, and there shall meet you a man bearing a pitcher of water: follow him.</text:span></text:p>
            <text:p text:style-name="P35"/>
            <text:p text:style-name="P33">Mark 15:42</text:p>
            <text:p text:style-name="P34">And now when the even was come, because <text:span text:style-name="T8">it was the preparation</text:span>, that is, <text:span text:style-name="T8">the day before the sabbath</text:span>,</text:p>
          </table:table-cell>
          <table:table-cell table:style-name="Table1.A1" office:value-type="string">
            <text:p text:style-name="P33">Luke 22:6-8</text:p>
            <text:p text:style-name="P34"><text:span text:style-name="T9">6</text:span> And he promised, and sought opportunity to betray him unto them in the absence of the multitude.</text:p>
            <text:p text:style-name="P34"><text:span text:style-name="T9">7</text:span> <text:span text:style-name="T8">Then came the day of unleavened bread, when the passover must be killed.</text:span></text:p>
            <text:p text:style-name="P34"><text:span text:style-name="T9">8</text:span> And he sent <text:span text:style-name="T45">Peter and John</text:span>, saying, <text:span text:style-name="T34">Go and prepare us the passover, that we may eat.</text:span></text:p>
          </table:table-cell>
          <table:table-cell table:style-name="Table1.D1" office:value-type="string">
            <text:p text:style-name="P33">John 19:14</text:p>
            <text:p text:style-name="P34">And it was <text:span text:style-name="T8">the preparation of the passover,</text:span> and about the sixth hour: and he saith unto the Jews, Behold your King!</text:p>
          </table:table-cell>
        </table:table-row>
      </table:table>
      <text:p text:style-name="P36"/>
      <text:p text:style-name="P37">When we first read <text:span text:style-name="T35">John 19:14</text:span> we might think it’s referring to the 10<text:span text:style-name="T9">th</text:span> day of the first month. <text:span text:style-name="T46">But, because of </text:span><text:span text:style-name="T47">Mark 15:42</text:span><text:span text:style-name="T46">, and the fact that all four of these are parallel passages, </text:span><text:span text:style-name="T48">and that they all occurred in the same year (</text:span><text:span text:style-name="T49">Luke 22:16,18</text:span><text:span text:style-name="T48">), </text:span><text:span text:style-name="T46">we know they are all referring to the same day:</text:span></text:p>
      <text:p text:style-name="P37"/>
      <text:list text:style-name="L4">
        <text:list-item>
          <text:p text:style-name="P38"><text:span text:style-name="T50">The </text:span><text:span text:style-name="T46">15</text:span><text:span text:style-name="T51">th</text:span><text:span text:style-name="T46"> day of the first month </text:span><text:span text:style-name="T52">(when the passover </text:span><text:span text:style-name="T53">is</text:span><text:span text:style-name="T52"> eaten).</text:span></text:p>
        </text:list-item>
        <text:list-item>
          <text:p text:style-name="P39"><text:span text:style-name="T54">A </text:span><text:span text:style-name="T46">Friday </text:span><text:span text:style-name="T48">(the day before the sabbath).</text:span></text:p>
        </text:list-item>
        <text:list-item>
          <text:p text:style-name="P39"><text:span text:style-name="T55">T</text:span><text:span text:style-name="T48">he first day of the feast of unleavened bread (</text:span><text:span text:style-name="T56">Legal/</text:span><text:span text:style-name="T57">Law</text:span><text:span text:style-name="T48"> reckoning).</text:span></text:p>
        </text:list-item>
        <text:list-item>
          <text:p text:style-name="P40"><text:span text:style-name="T55">T</text:span>he second day of the feast of unleavened bread (Jewish custom).</text:p>
        </text:list-item>
        <text:list-item>
          <text:p text:style-name="P41">The preparation / the preparation of the passover.</text:p>
        </text:list-item>
      </text:list>
      <text:p text:style-name="P42"/>
      <text:p text:style-name="P42"/>
      <table:table table:name="Table3" table:style-name="Table3">
        <table:table-column table:style-name="Table3.A"/>
        <table:table-row>
          <table:table-cell table:style-name="Table3.A1" office:value-type="string">
            <text:p text:style-name="P43"><text:span text:style-name="T35">Deuteronomy 21:22-23</text:span> (cf. <text:span text:style-name="T58">Acts 5:30</text:span>, <text:span text:style-name="T58">10:39</text:span>, <text:span text:style-name="T59">2Cor 5:21</text:span>, <text:span text:style-name="T58">Gal 3:13</text:span>, <text:span text:style-name="T60">1Pet 2:24</text:span>)</text:p>
            <text:p text:style-name="Table_20_Contents"><text:span text:style-name="T9">22</text:span> And if a man have committed a sin worthy of death, and he be to be put to death, and thou hang him on a tree:</text:p>
            <text:p text:style-name="Table_20_Contents"><text:span text:style-name="T9">23</text:span> <text:span text:style-name="T5">His</text:span><text:span text:style-name="T3"> body shall not remain all night upon </text:span><text:span text:style-name="T61">the</text:span><text:span text:style-name="T3"> tree, but thou shalt in any wise bury </text:span><text:span text:style-name="T5">him</text:span><text:span text:style-name="T3"> that day</text:span>; (for he that is hanged is accursed of God;) that thy land be not defiled, which the LORD thy God giveth thee for an inheritance.</text:p>
          </table:table-cell>
        </table:table-row>
      </table:table>
      <text:p text:style-name="P42"/>
      <text:p text:style-name="P42"/>
      <text:p text:style-name="P44">Search <text:span text:style-name="T62">the scriptures</text:span>; for in them ye think ye have eternal life: and they are they which <text:span text:style-name="T62">testify of 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8T16:10:05.484442433</meta:creation-date>
    <dc:title>The feast of unleavened bread</dc:title>
    <meta:editing-duration>PT2H11M51S</meta:editing-duration>
    <meta:editing-cycles>81</meta:editing-cycles>
    <meta:generator>LibreOffice/26.2.4.2$Linux_X86_64 LibreOffice_project/64a984c51f4702dbd3710b13428c673a2f1292e7</meta:generator>
    <dc:date>2026-07-11T12:30:36.301316652</dc:date>
    <meta:document-statistic meta:table-count="8" meta:image-count="0" meta:object-count="0" meta:page-count="3" meta:paragraph-count="109" meta:word-count="1629" meta:character-count="8308" meta:non-whitespace-character-count="6802"/>
    <meta:template xlink:type="simple" xlink:actuate="onRequest" xlink:title="default" xlink:href="../../../../Templates/default.ott" meta:date="2026-05-18T16:10:05.131478416"/>
  </office:meta>
</office:document-meta>
</file>