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officeooo:rsid="001d7918" officeooo:paragraph-rsid="001d7918"/>
    </style:style>
    <style:style style:name="P2" style:family="paragraph" style:parent-style-name="Standard">
      <style:text-properties officeooo:rsid="001d7918" officeooo:paragraph-rsid="001d7918"/>
    </style:style>
    <style:style style:name="P3" style:family="paragraph" style:parent-style-name="Standard" style:list-style-name="L1">
      <style:text-properties officeooo:rsid="001ee3b8" officeooo:paragraph-rsid="001ee3b8"/>
    </style:style>
    <style:style style:name="P4" style:family="paragraph" style:parent-style-name="Standard" style:list-style-name="L1">
      <style:text-properties officeooo:rsid="001ef521" officeooo:paragraph-rsid="001ef521"/>
    </style:style>
    <style:style style:name="P5" style:family="paragraph" style:parent-style-name="Standard" style:list-style-name="L1">
      <style:text-properties officeooo:paragraph-rsid="00316068"/>
    </style:style>
    <style:style style:name="P6" style:family="paragraph" style:parent-style-name="Standard">
      <style:text-properties officeooo:rsid="002069b4" officeooo:paragraph-rsid="00316068"/>
    </style:style>
    <style:style style:name="P7" style:family="paragraph" style:parent-style-name="Standard">
      <style:text-properties officeooo:rsid="00252b87" officeooo:paragraph-rsid="00252b87"/>
    </style:style>
    <style:style style:name="P8" style:family="paragraph" style:parent-style-name="Standard">
      <style:text-properties officeooo:rsid="0047a549" officeooo:paragraph-rsid="0047a549"/>
    </style:style>
    <style:style style:name="P9" style:family="paragraph" style:parent-style-name="Standard">
      <style:text-properties officeooo:paragraph-rsid="00252b87"/>
    </style:style>
    <style:style style:name="P10" style:family="paragraph" style:parent-style-name="Standard">
      <style:text-properties officeooo:rsid="0037c064" officeooo:paragraph-rsid="0037c064"/>
    </style:style>
    <style:style style:name="P11" style:family="paragraph" style:parent-style-name="Standard">
      <style:text-properties officeooo:rsid="003dba27" officeooo:paragraph-rsid="003dba27"/>
    </style:style>
    <style:style style:name="P12" style:family="paragraph" style:parent-style-name="Standard" style:list-style-name="L2">
      <style:text-properties officeooo:rsid="003dc993" officeooo:paragraph-rsid="003dc993"/>
    </style:style>
    <style:style style:name="P13" style:family="paragraph" style:parent-style-name="Standard" style:list-style-name="L2">
      <style:text-properties officeooo:rsid="00400b0a" officeooo:paragraph-rsid="00400b0a"/>
    </style:style>
    <style:style style:name="P14" style:family="paragraph" style:parent-style-name="Standard" style:list-style-name="L2">
      <style:text-properties officeooo:rsid="0043de67" officeooo:paragraph-rsid="00444d4c"/>
    </style:style>
    <style:style style:name="P15" style:family="paragraph" style:parent-style-name="Standard" style:list-style-name="L2">
      <style:text-properties officeooo:rsid="00444d4c" officeooo:paragraph-rsid="00444d4c"/>
    </style:style>
    <style:style style:name="T1" style:family="text">
      <style:text-properties fo:color="#127622" loext:opacity="100%"/>
    </style:style>
    <style:style style:name="T2" style:family="text">
      <style:text-properties fo:font-family="'Liberation Sans'" style:font-style-name="Regular" style:font-family-generic="swiss" officeooo:rsid="00236197"/>
    </style:style>
    <style:style style:name="T3" style:family="text">
      <style:text-properties style:font-name="Liberation Sans1" officeooo:rsid="00236197"/>
    </style:style>
    <style:style style:name="T4" style:family="text">
      <style:text-properties fo:background-color="#fff5ce" loext:char-shading-value="0"/>
    </style:style>
    <style:style style:name="T5" style:family="text">
      <style:text-properties fo:background-color="#ffffd7" loext:char-shading-value="0"/>
    </style:style>
    <style:style style:name="T6" style:family="text">
      <style:text-properties officeooo:rsid="002f3e53"/>
    </style:style>
    <style:style style:name="T7" style:family="text">
      <style:text-properties officeooo:rsid="002f5513"/>
    </style:style>
    <style:style style:name="T8" style:family="text">
      <style:text-properties officeooo:rsid="002d2237"/>
    </style:style>
    <style:style style:name="T9" style:family="text">
      <style:text-properties officeooo:rsid="002069b4"/>
    </style:style>
    <style:style style:name="T10" style:family="text">
      <style:text-properties officeooo:rsid="003312d9"/>
    </style:style>
    <style:style style:name="T11" style:family="text">
      <style:text-properties officeooo:rsid="00257ed4"/>
    </style:style>
    <style:style style:name="T12" style:family="text">
      <style:text-properties officeooo:rsid="00347151"/>
    </style:style>
    <style:style style:name="T13" style:family="text">
      <style:text-properties fo:font-style="italic" style:font-style-asian="italic" style:font-style-complex="italic"/>
    </style:style>
    <style:style style:name="T14" style:family="text">
      <style:text-properties officeooo:rsid="00252b87"/>
    </style:style>
    <style:style style:name="T15" style:family="text">
      <style:text-properties officeooo:rsid="00306017"/>
    </style:style>
    <style:style style:name="T16" style:family="text">
      <style:text-properties officeooo:rsid="0035ef98"/>
    </style:style>
    <style:style style:name="T17" style:family="text">
      <style:text-properties fo:font-weight="bold" officeooo:rsid="003e905b" style:font-weight-asian="bold" style:font-weight-complex="bold"/>
    </style:style>
    <style:style style:name="T18" style:family="text">
      <style:text-properties officeooo:rsid="0047a549"/>
    </style:style>
    <style:style style:name="T19" style:family="text">
      <style:text-properties fo:font-weight="bold" style:font-weight-asian="bold" style:font-weight-complex="bold"/>
    </style:style>
    <style:style style:name="T20" style:family="text">
      <style:text-properties officeooo:rsid="004bfb07"/>
    </style:style>
    <style:style style:name="T21" style:family="text">
      <style:text-properties officeooo:rsid="0041c8b3"/>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officeooo:rsid="0042f449"/>
    </style:style>
    <style:style style:name="T24" style:family="text">
      <style:text-properties fo:font-style="italic" officeooo:rsid="0041c8b3" style:font-style-asian="italic" style:font-style-complex="italic"/>
    </style:style>
    <style:style style:name="T25" style:family="text">
      <style:text-properties officeooo:rsid="00462de8"/>
    </style:style>
    <style:style style:name="T26" style:family="text">
      <style:text-properties officeooo:rsid="0047c4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riddle within a riddle</text:p>
      <text:p text:style-name="Standard"/>
      <text:p text:style-name="P2">In <text:span text:style-name="T1">Judges 14</text:span> Samson puts forth a riddle to the thirty companions. But, what you may not have noticed is that there is a “riddle” within Samson’s riddle:</text:p>
      <text:p text:style-name="Standard"/>
      <table:table table:name="Table1" table:style-name="Table1">
        <table:table-column table:style-name="Table1.A"/>
        <table:table-row>
          <table:table-cell table:style-name="Table1.A1" office:value-type="string">
            <text:p text:style-name="Table_20_Contents"><text:span text:style-name="T1">Judges 14:10-18</text:span><text:line-break/><text:span text:style-name="T1">10</text:span> <text:span text:style-name="T2">¶</text:span><text:span text:style-name="T3"> </text:span>So his father went down unto the woman: and Samson made there a feast; for so used the young men to do.<text:line-break/><text:span text:style-name="T1">11</text:span> And it came to pass, when they saw him, that they brought thirty companions to be with him.<text:line-break/><text:span text:style-name="T1">12</text:span> And Samson said unto them, I will now put forth a riddle unto you: if ye can certainly declare it me <text:span text:style-name="T4">within the seven days </text:span><text:span text:style-name="T5">of the feast</text:span>, and find it out, then I will give you thirty sheets and thirty change of garments:<text:line-break/><text:span text:style-name="T1">13</text:span> But if ye cannot declare it me, then shall ye give me thirty sheets and thirty change of garments. And they said unto him, Put forth thy riddle, that we may hear it.<text:line-break/><text:span text:style-name="T1">14</text:span> And he said unto them, Out of the eater came forth meat, and out of the strong came forth sweetness. And they could not <text:span text:style-name="T4">in three days</text:span> expound the riddle.<text:line-break/><text:span text:style-name="T1">15</text:span> <text:span text:style-name="T4">And it came to pass on the seventh day</text:span>, that they said unto Samson's wife, Entice thy husband, that he may declare unto us the riddle, lest we burn thee and thy father's house with fire: have ye called us to take that we have? is it not so?<text:line-break/><text:span text:style-name="T1">16</text:span> And Samson's wife wept before him, and said, Thou dost but hate me, and lovest me not: thou hast put forth a riddle unto the children of my people, and hast not told it me. And he said unto her, Behold, I have not told it my father nor my mother, and shall I tell it thee?<text:line-break/><text:span text:style-name="T1">17</text:span> <text:span text:style-name="T4">And she wept before him the seven days, </text:span><text:span text:style-name="T5">while their feast lasted</text:span>: and it came to pass <text:span text:style-name="T4">on the seventh day</text:span>, that he told her, because she lay sore upon him: and she told the riddle to the children of her people.<text:line-break/><text:span text:style-name="T1">18</text:span> And the men of the city said unto him <text:span text:style-name="T4">on the seventh day before the sun went down</text:span>, What is sweeter than honey? and what is stronger than a lion? And he said unto them, If ye had not plowed with my heifer, ye had not found out my riddle.</text:p>
          </table:table-cell>
        </table:table-row>
      </table:table>
      <text:list text:style-name="L1">
        <text:list-item>
          <text:p text:style-name="P3">Before the <text:span text:style-name="T6">seven</text:span> day feast begins, Samson puts forth his riddle.</text:p>
        </text:list-item>
        <text:list-item>
          <text:p text:style-name="P4">On the <text:span text:style-name="T7">seventh </text:span>day, the companions threaten Samson’s unnamed wife for the answer to <text:span text:style-name="T8">the</text:span> riddle.</text:p>
        </text:list-item>
        <text:list-item>
          <text:p text:style-name="P5"><text:span text:style-name="T9">All </text:span><text:span text:style-name="T6">seven</text:span><text:span text:style-name="T9"> days of the feast she wept before him and on </text:span>the <text:span text:style-name="T7">seventh </text:span>day:</text:p>
        </text:list-item>
      </text:list>
      <text:p text:style-name="P6"/>
      <text:p text:style-name="P7">If you stop and think <text:span text:style-name="T10">about </text:span><text:span text:style-name="T11">what we just read </text:span>for a moment, <text:span text:style-name="T12">at first there appears to be a riddle in the midst:</text:span></text:p>
      <text:p text:style-name="P7"/>
      <text:p text:style-name="P8"><text:tab/><text:span text:style-name="T13">Seven days of the feast her weeping did occur, How then on the seventh did the thirty threaten her?</text:span></text:p>
      <text:p text:style-name="P8"/>
      <text:p text:style-name="P9"><text:span text:style-name="T14">How did she weep before him all </text:span><text:span text:style-name="T15">seven</text:span><text:span text:style-name="T14"> days of the feast if they didn’t threaten her until the </text:span><text:span text:style-name="T16">seventh </text:span><text:span text:style-name="T14">day? 👀</text:span></text:p>
      <text:p text:style-name="P10"/>
      <text:p text:style-name="P10"/>
      <text:p text:style-name="P11">Let’s start over because the “solution” to this apparent riddle is more obvious if we look closely 🔍.</text:p>
      <text:list text:style-name="L2">
        <text:list-item>
          <text:p text:style-name="P12">Samson declares the riddle <text:span text:style-name="T17">before</text:span> the seven day feast begins. That means <text:span text:style-name="T18">they were gathered together </text:span><text:span text:style-name="T19">before</text:span> the seven days of the feast began. <text:span text:style-name="T13">How long</text:span>, exactly?</text:p>
          <text:list>
            <text:list-item>
              <text:p text:style-name="P13">Take careful <text:span text:style-name="T20">note</text:span> of the <text:span text:style-name="T20">exact </text:span>words in verse <text:span text:style-name="T1">15</text:span>: it doesn’t say “<text:span text:style-name="T21">on </text:span>the seventh day <text:span text:style-name="T22">of the feast</text:span>”. <text:span text:style-name="T21">It says “on the seventh day”. We might </text:span><text:span text:style-name="T23">understand</text:span><text:span text:style-name="T21"> that as “on the seventh day </text:span><text:span text:style-name="T24">before the feast began</text:span><text:span text:style-name="T21">”.</text:span></text:p>
            </text:list-item>
            <text:list-item>
              <text:p text:style-name="P14">And so the answer to “<text:span text:style-name="T13">How long</text:span>, exactly?” is: seven days.</text:p>
            </text:list-item>
          </text:list>
        </text:list-item>
        <text:list-item>
          <text:p text:style-name="P15"><text:span text:style-name="T25">Thus, </text:span><text:span text:style-name="T26">the answer to the riddle within the riddle is that </text:span><text:span text:style-name="T25">t</text:span>here were seven days preceding the seven day feas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7T09:19:42.599144400</meta:creation-date>
    <dc:title>A riddle within a riddle</dc:title>
    <meta:editing-duration>PT1H5M</meta:editing-duration>
    <meta:editing-cycles>50</meta:editing-cycles>
    <meta:generator>LibreOffice/26.2.4.2$Linux_X86_64 LibreOffice_project/64a984c51f4702dbd3710b13428c673a2f1292e7</meta:generator>
    <dc:date>2026-07-11T12:30:29.789311780</dc:date>
    <meta:document-statistic meta:table-count="1" meta:image-count="0" meta:object-count="0" meta:page-count="1" meta:paragraph-count="14" meta:word-count="619" meta:character-count="3103" meta:non-whitespace-character-count="2504"/>
    <meta:template xlink:type="simple" xlink:actuate="onRequest" xlink:title="default" xlink:href="../../../../AppData/Roaming/LibreOffice/4/user/template/default1.ott" meta:date="2026-01-27T09:19:42.281314400"/>
  </office:meta>
</office:document-meta>
</file>