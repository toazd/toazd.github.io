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F00000088E88DC6E5.png" manifest:media-type="image/png"/>
  <manifest:file-entry manifest:full-path="Pictures/100000010000019E0000007DC0A76DD1.png" manifest:media-type="image/png"/>
  <manifest:file-entry manifest:full-path="Pictures/1000000100000237000000764F54DAF3.png" manifest:media-type="image/png"/>
  <manifest:file-entry manifest:full-path="Pictures/10000001000001CE00000096159400D9.png" manifest:media-type="image/png"/>
  <manifest:file-entry manifest:full-path="Pictures/10000001000002A70000010D9329DA0E.png" manifest:media-type="image/png"/>
  <manifest:file-entry manifest:full-path="Pictures/10000001000001EE00000097223710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8986in" table:align="left"/>
    </style:style>
    <style:style style:name="Table1.A" style:family="table-column">
      <style:table-column-properties style:column-width="1.6042in"/>
    </style:style>
    <style:style style:name="Table1.B" style:family="table-column">
      <style:table-column-properties style:column-width="4.3806in"/>
    </style:style>
    <style:style style:name="Table1.C" style:family="table-column">
      <style:table-column-properties style:column-width="1.9139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17eae" officeooo:paragraph-rsid="00117eae"/>
    </style:style>
    <style:style style:name="P2" style:family="paragraph" style:parent-style-name="Table_20_Contents">
      <style:paragraph-properties fo:text-align="center" style:justify-single-word="false"/>
      <style:text-properties officeooo:rsid="00123ca1" officeooo:paragraph-rsid="00123ca1"/>
    </style:style>
    <style:style style:name="P3" style:family="paragraph" style:parent-style-name="Table_20_Contents">
      <style:paragraph-properties fo:text-align="center" style:justify-single-word="false"/>
      <style:text-properties officeooo:rsid="001ac57f" officeooo:paragraph-rsid="001ac57f"/>
    </style:style>
    <style:style style:name="P4" style:family="paragraph" style:parent-style-name="Table_20_Contents">
      <style:text-properties officeooo:rsid="00359173" officeooo:paragraph-rsid="00359173"/>
    </style:style>
    <style:style style:name="P5" style:family="paragraph" style:parent-style-name="Table_20_Contents">
      <style:paragraph-properties fo:text-align="left" style:justify-single-word="false"/>
      <style:text-properties officeooo:rsid="001ac57f" officeooo:paragraph-rsid="00259357"/>
    </style:style>
    <style:style style:name="P6" style:family="paragraph" style:parent-style-name="Table_20_Contents" style:list-style-name="L1">
      <style:text-properties fo:color="#ff0000" loext:opacity="100%" officeooo:rsid="0020f987" officeooo:paragraph-rsid="004b1c8d"/>
    </style:style>
    <style:style style:name="P7" style:family="paragraph" style:parent-style-name="Table_20_Contents">
      <style:text-properties officeooo:rsid="003b5d0f" officeooo:paragraph-rsid="003b5d0f"/>
    </style:style>
    <style:style style:name="P8" style:family="paragraph" style:parent-style-name="Table_20_Contents">
      <style:paragraph-properties fo:text-align="center" style:justify-single-word="false"/>
      <style:text-properties officeooo:rsid="001ac57f" officeooo:paragraph-rsid="00259357"/>
    </style:style>
    <style:style style:name="P9" style:family="paragraph" style:parent-style-name="Table_20_Contents">
      <style:paragraph-properties fo:text-align="left" style:justify-single-word="false"/>
      <style:text-properties officeooo:paragraph-rsid="003cb41d"/>
    </style:style>
    <style:style style:name="P10" style:family="paragraph" style:parent-style-name="Table_20_Contents" style:list-style-name="L2">
      <style:text-properties fo:color="#ff0000" loext:opacity="100%" officeooo:rsid="0020f987" officeooo:paragraph-rsid="004bd89a"/>
    </style:style>
    <style:style style:name="P11" style:family="paragraph" style:parent-style-name="Table_20_Contents">
      <style:text-properties officeooo:rsid="00508581" officeooo:paragraph-rsid="00508581"/>
    </style:style>
    <style:style style:name="P12" style:family="paragraph" style:parent-style-name="Table_20_Contents" style:list-style-name="L3">
      <style:text-properties style:use-window-font-color="true" loext:opacity="0%" officeooo:rsid="00522bb4" officeooo:paragraph-rsid="00522bb4"/>
    </style:style>
    <style:style style:name="P13" style:family="paragraph" style:parent-style-name="Table_20_Contents" style:list-style-name="L3">
      <style:text-properties style:use-window-font-color="true" loext:opacity="0%" officeooo:rsid="00542bac" officeooo:paragraph-rsid="00542bac"/>
    </style:style>
    <style:style style:name="P14" style:family="paragraph" style:parent-style-name="Table_20_Contents">
      <style:text-properties officeooo:rsid="0025c1a5" officeooo:paragraph-rsid="0025c1a5"/>
    </style:style>
    <style:style style:name="P15" style:family="paragraph" style:parent-style-name="Table_20_Contents">
      <style:text-properties officeooo:rsid="0013f51a" officeooo:paragraph-rsid="00259357"/>
    </style:style>
    <style:style style:name="P16" style:family="paragraph" style:parent-style-name="Table_20_Contents">
      <style:text-properties officeooo:rsid="00123ca1" officeooo:paragraph-rsid="00123ca1"/>
    </style:style>
    <style:style style:name="P17" style:family="paragraph" style:parent-style-name="Table_20_Contents">
      <style:text-properties officeooo:rsid="001ac57f" officeooo:paragraph-rsid="001ac57f"/>
    </style:style>
    <style:style style:name="P18" style:family="paragraph" style:parent-style-name="Table_20_Contents">
      <style:text-properties officeooo:rsid="001ac57f" officeooo:paragraph-rsid="00259357"/>
    </style:style>
    <style:style style:name="P19" style:family="paragraph" style:parent-style-name="Table_20_Contents" style:list-style-name="L4">
      <style:text-properties officeooo:rsid="001ac57f" officeooo:paragraph-rsid="001ac57f"/>
    </style:style>
    <style:style style:name="P20" style:family="paragraph" style:parent-style-name="Table_20_Contents" style:list-style-name="L4">
      <style:text-properties officeooo:rsid="001ac935" officeooo:paragraph-rsid="001ac935"/>
    </style:style>
    <style:style style:name="P21" style:family="paragraph" style:parent-style-name="Table_20_Contents">
      <style:text-properties officeooo:rsid="001edf36" officeooo:paragraph-rsid="001edf36"/>
    </style:style>
    <style:style style:name="P22" style:family="paragraph" style:parent-style-name="Table_20_Contents">
      <style:text-properties officeooo:rsid="001fe43f" officeooo:paragraph-rsid="001fe43f"/>
    </style:style>
    <style:style style:name="P23" style:family="paragraph" style:parent-style-name="Table_20_Contents">
      <style:text-properties officeooo:rsid="0024965b" officeooo:paragraph-rsid="0024965b"/>
    </style:style>
    <style:style style:name="P24" style:family="paragraph" style:parent-style-name="Table_20_Contents">
      <style:paragraph-properties fo:text-align="center" style:justify-single-word="false"/>
      <style:text-properties officeooo:rsid="00205bb3" officeooo:paragraph-rsid="00259357"/>
    </style:style>
    <style:style style:name="P25" style:family="paragraph" style:parent-style-name="Table_20_Contents">
      <style:text-properties officeooo:rsid="00205bb3" officeooo:paragraph-rsid="00259357"/>
    </style:style>
    <style:style style:name="P26" style:family="paragraph" style:parent-style-name="Table_20_Contents" style:list-style-name="L2">
      <style:text-properties fo:color="#ff0000" loext:opacity="100%" officeooo:rsid="0020f987" officeooo:paragraph-rsid="0020f987"/>
    </style:style>
    <style:style style:name="P27" style:family="paragraph" style:parent-style-name="Table_20_Contents" style:list-style-name="L2">
      <style:text-properties officeooo:rsid="0020f987" officeooo:paragraph-rsid="0020f987"/>
    </style:style>
    <style:style style:name="P28" style:family="paragraph" style:parent-style-name="Table_20_Contents">
      <style:text-properties officeooo:rsid="002db928" officeooo:paragraph-rsid="002db928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left" style:justify-single-word="false"/>
      <style:text-properties officeooo:rsid="002dc050" officeooo:paragraph-rsid="002dc050"/>
    </style:style>
    <style:style style:name="P31" style:family="paragraph" style:parent-style-name="Table_20_Contents" style:list-style-name="L5">
      <style:text-properties officeooo:rsid="001a2515" officeooo:paragraph-rsid="001a2515"/>
    </style:style>
    <style:style style:name="P32" style:family="paragraph" style:parent-style-name="Table_20_Contents">
      <style:text-properties officeooo:rsid="004ee0ff" officeooo:paragraph-rsid="004ee0ff"/>
    </style:style>
    <style:style style:name="P33" style:family="paragraph" style:parent-style-name="Table_20_Contents">
      <style:paragraph-properties fo:text-align="left" style:justify-single-word="false"/>
      <style:text-properties officeooo:rsid="004ee0ff" officeooo:paragraph-rsid="004ee0ff"/>
    </style:style>
    <style:style style:name="P34" style:family="paragraph" style:parent-style-name="Table_20_Contents">
      <style:text-properties officeooo:rsid="001a2515" officeooo:paragraph-rsid="001a2515"/>
    </style:style>
    <style:style style:name="P35" style:family="paragraph" style:parent-style-name="Table_20_Contents">
      <style:text-properties officeooo:rsid="0041e652" officeooo:paragraph-rsid="0041e652"/>
    </style:style>
    <style:style style:name="P36" style:family="paragraph" style:parent-style-name="Table_20_Contents">
      <style:text-properties officeooo:rsid="004479ba" officeooo:paragraph-rsid="004479ba"/>
    </style:style>
    <style:style style:name="P37" style:family="paragraph" style:parent-style-name="Table_20_Contents" style:list-style-name="L6">
      <style:text-properties officeooo:rsid="001a2515" officeooo:paragraph-rsid="001a2515"/>
    </style:style>
    <style:style style:name="P38" style:family="paragraph" style:parent-style-name="Table_20_Contents" style:list-style-name="L7">
      <style:text-properties officeooo:paragraph-rsid="001a2515"/>
    </style:style>
    <style:style style:name="T1" style:family="text">
      <style:text-properties officeooo:rsid="00205bb3"/>
    </style:style>
    <style:style style:name="T2" style:family="text">
      <style:text-properties officeooo:rsid="002854bb"/>
    </style:style>
    <style:style style:name="T3" style:family="text">
      <style:text-properties style:text-position="super 58%" officeooo:rsid="002854bb"/>
    </style:style>
    <style:style style:name="T4" style:family="text">
      <style:text-properties officeooo:rsid="003b7b62"/>
    </style:style>
    <style:style style:name="T5" style:family="text">
      <style:text-properties fo:color="#ff0000" loext:opacity="100%" officeooo:rsid="003b7b62"/>
    </style:style>
    <style:style style:name="T6" style:family="text">
      <style:text-properties officeooo:rsid="003deda3"/>
    </style:style>
    <style:style style:name="T7" style:family="text">
      <style:text-properties fo:color="#ff0000" loext:opacity="100%" officeooo:rsid="003deda3"/>
    </style:style>
    <style:style style:name="T8" style:family="text">
      <style:text-properties officeooo:rsid="004dee94"/>
    </style:style>
    <style:style style:name="T9" style:family="text">
      <style:text-properties officeooo:rsid="001ac57f"/>
    </style:style>
    <style:style style:name="T10" style:family="text">
      <style:text-properties officeooo:rsid="001bf5af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5e94f"/>
    </style:style>
    <style:style style:name="T13" style:family="text">
      <style:text-properties officeooo:rsid="001ac935"/>
    </style:style>
    <style:style style:name="T14" style:family="text">
      <style:text-properties officeooo:rsid="003001b6"/>
    </style:style>
    <style:style style:name="T15" style:family="text">
      <style:text-properties officeooo:rsid="001c92b1"/>
    </style:style>
    <style:style style:name="T16" style:family="text">
      <style:text-properties officeooo:rsid="002db928"/>
    </style:style>
    <style:style style:name="T17" style:family="text">
      <style:text-properties fo:color="#ff0000" loext:opacity="100%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05bb3" style:font-weight-asian="normal" style:font-weight-complex="normal"/>
    </style:style>
    <style:style style:name="T20" style:family="text">
      <style:text-properties officeooo:rsid="00211324"/>
    </style:style>
    <style:style style:name="T21" style:family="text">
      <style:text-properties officeooo:rsid="002f42d7"/>
    </style:style>
    <style:style style:name="T22" style:family="text">
      <style:text-properties officeooo:rsid="0033a3da"/>
    </style:style>
    <style:style style:name="T23" style:family="text">
      <style:text-properties officeooo:rsid="00463b64"/>
    </style:style>
    <style:style style:name="T24" style:family="text">
      <style:text-properties officeooo:rsid="001a799b"/>
    </style:style>
    <style:style style:name="T25" style:family="text">
      <style:text-properties officeooo:rsid="001a2515"/>
    </style:style>
    <style:style style:name="T26" style:family="text">
      <style:text-properties officeooo:rsid="0022bd7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KJV Edition</text:p>
          </table:table-cell>
          <table:table-cell table:style-name="Table1.A1" office:value-type="string">
            <text:p text:style-name="P2">Exodus 23:23</text:p>
          </table:table-cell>
          <table:table-cell table:style-name="Table1.C1" office:value-type="string">
            <text:p text:style-name="P3">Changes <text:span text:style-name="T1">relative to </text:span><text:span text:style-name="T2">1</text:span><text:span text:style-name="T3">st</text:span><text:span text:style-name="T2"> edition </text:span><text:span text:style-name="T1">161</text:span><text:span text:style-name="T2">1</text:span></text:p>
          </table:table-cell>
        </table:table-row>
        <table:table-row>
          <table:table-cell table:style-name="Table1.A2" office:value-type="string">
            <text:p text:style-name="P4">Bishops Bible 1568</text:p>
          </table:table-cell>
          <table:table-cell table:style-name="Table1.B2" office:value-type="string">
            <text:p text:style-name="P5">23 For myne angell shall go before thee, and bryng thee in vnto the Amorites, and Hethites, and Pharezites, &amp; Chanaanites, Heuites, and Iebusites, and I shall destroy them.</text:p>
          </table:table-cell>
          <table:table-cell table:style-name="Table1.C2" office:value-type="string">
            <text:list text:style-name="L1">
              <text:list-item>
                <text:p text:style-name="P6">The “a” in Angel made lowercase</text:p>
              </text:list-item>
            </text:list>
          </table:table-cell>
        </table:table-row>
        <table:table-row>
          <table:table-cell table:style-name="Table1.A2" office:value-type="string">
            <text:p text:style-name="P7">The Great Bible 1541 <text:span text:style-name="T4">(</text:span><text:span text:style-name="T5">no verse numbers</text:span><text:span text:style-name="T4">)</text:span></text:p>
          </table:table-cell>
          <table:table-cell table:style-name="Table1.B2" office:value-type="string">
            <text:p text:style-name="P8"><draw:frame draw:style-name="fr1" draw:name="Image5" text:anchor-type="as-char" svg:width="4.0417in" svg:height="1.2346in" draw:z-index="1"><draw:image xlink:href="Pictures/10000001000001EE000000972237108B.png" xlink:type="simple" xlink:show="embed" xlink:actuate="onLoad" draw:mime-type="image/png"/></draw:frame></text:p>
            <text:p text:style-name="P9"><text:span text:style-name="T6">(</text:span><text:span text:style-name="T7">23</text:span><text:span text:style-name="T6">) </text:span>For myne angell shall go before thee, and brynge thee in vnto the Amorites, and Hethytes, and Pherizites, and Canaanites, Heuites, and Iebusites, and I shall destroye them.</text:p>
          </table:table-cell>
          <table:table-cell table:style-name="Table1.C2" office:value-type="string">
            <text:list xml:id="list3162637288" text:style-name="L2">
              <text:list-item>
                <text:p text:style-name="P10">The “a” in Angel made lowercase</text:p>
              </text:list-item>
            </text:list>
          </table:table-cell>
        </table:table-row>
        <table:table-row>
          <table:table-cell table:style-name="Table1.A2" office:value-type="string">
            <text:p text:style-name="P11">1560 Geneva Bible (protestants)</text:p>
          </table:table-cell>
          <table:table-cell table:style-name="Table1.B2" office:value-type="string">
            <text:p text:style-name="P5">23 For mine Angel shall go before thee, &amp; bring thee vnto the Amorites, and the Hittites, and the Perizzites, and the Canaanites, the Hiuites, and the Iebusites, and I will destroy them.</text:p>
          </table:table-cell>
          <table:table-cell table:style-name="Table1.C2" office:value-type="string">
            <text:list text:style-name="L3">
              <text:list-item>
                <text:p text:style-name="P12">&amp; instead of and</text:p>
              </text:list-item>
              <text:list-item>
                <text:p text:style-name="P12">missing “in” between “thee vnto”</text:p>
              </text:list-item>
              <text:list-item>
                <text:p text:style-name="P13">Comma instead of colon after lebusites</text:p>
              </text:list-item>
              <text:list-item>
                <text:p text:style-name="P12">“I will destroy them” instead of “I will cut them off.”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The Holy Bible King James 1611 The First Edition Imprinted by Robert Barker</text:p>
            <text:p text:style-name="Table_20_Contents"/>
            <text:p text:style-name="P14"><text:span text:style-name="T8">F</text:span>irst editions can be identified by Ruth 3:15b “and he went into the citie” instead of “she went into the citie”</text:p>
          </table:table-cell>
          <table:table-cell table:style-name="Table1.B2" office:value-type="string">
            <text:p text:style-name="P8"><draw:frame draw:style-name="fr2" draw:name="Image1" text:anchor-type="as-char" svg:width="2.5571in" svg:height="1.0126in" draw:z-index="4"><draw:image xlink:href="Pictures/10000001000002A70000010D9329DA0E.png" xlink:type="simple" xlink:show="embed" xlink:actuate="onLoad" draw:mime-type="image/png"/></draw:frame></text:p>
            <text:p text:style-name="P15"><text:span text:style-name="T9">23 </text:span>For mine Angel shall go<text:span text:style-name="T10">e</text:span> before thee, and bring thee <text:span text:style-name="T11">in</text:span> unto the Amorites, and the Hittites, and the Perizzit<text:span text:style-name="T12">e</text:span>s, and the Canaanites, the Hivites, and the Jebusites<text:span text:style-name="T11">:</text:span> and I will <text:span text:style-name="T11">cut them off</text:span>.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The Bible (Robert Barker 1616)</text:p>
          </table:table-cell>
          <table:table-cell table:style-name="Table1.B6" office:value-type="string">
            <text:p text:style-name="P8"><draw:frame draw:style-name="fr2" draw:name="Image2" text:anchor-type="as-char" svg:width="2.5571in" svg:height="0.8299in" draw:z-index="3"><draw:image xlink:href="Pictures/10000001000001CE00000096159400D9.png" xlink:type="simple" xlink:show="embed" xlink:actuate="onLoad" draw:mime-type="image/png"/></draw:frame></text:p>
            <text:p text:style-name="P18">23 For mine Angel shall go<text:span text:style-name="T10">e</text:span> before thee, and bring thee unto the Amorites, and the Hittites, and the Perizzites, and the Canaanites, the Hivites, and the Jebusites<text:span text:style-name="T11">,</text:span> and I will <text:span text:style-name="T11">destroy them</text:span>.</text:p>
          </table:table-cell>
          <table:table-cell table:style-name="Table1.C6" office:value-type="string">
            <text:list text:style-name="L4">
              <text:list-item>
                <text:p text:style-name="P19">“<text:span text:style-name="T13">in” removed</text:span></text:p>
              </text:list-item>
              <text:list-item>
                <text:p text:style-name="P20">Colon changed to a comma <text:span text:style-name="T14">after Jebusites</text:span></text:p>
              </text:list-item>
              <text:list-item>
                <text:p text:style-name="P20">“<text:span text:style-name="T15">cut them off” changed to “destroy them”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21">The Bible “Printed by Tho<text:span text:style-name="T16">mas</text:span> and John Buck printers to the University of <text:span text:style-name="T17">Cambridge</text:span>” 1629</text:p>
            <text:p text:style-name="P21"/>
            <text:p text:style-name="P22"><text:span text:style-name="T17">NOTE:</text:span> <text:span text:style-name="T18">man</text:span><text:span text:style-name="T19">y</text:span><text:span text:style-name="T1"> </text:span>heretical doctrines preceding the Biblical text</text:p>
            <text:p text:style-name="P22"/>
            <text:p text:style-name="P23">Edited by: Samuel Ward and John Bois (supposedly to correct errors introduced in early printings)</text:p>
          </table:table-cell>
          <table:table-cell table:style-name="Table1.B7" office:value-type="string">
            <text:p text:style-name="P24"><draw:frame draw:style-name="fr2" draw:name="Image3" text:anchor-type="as-char" svg:width="4.0484in" svg:height="0.8425in" draw:z-index="0"><draw:image xlink:href="Pictures/1000000100000237000000764F54DAF3.png" xlink:type="simple" xlink:show="embed" xlink:actuate="onLoad" draw:mime-type="image/png"/></draw:frame></text:p>
            <text:p text:style-name="P25">23 For mine <text:span text:style-name="T11">a</text:span>ngel shall <text:span text:style-name="T11">go</text:span> before thee, and bring thee in unto the Amorites, and the Hittites, and the Perizzites, and the Canaanites, <text:span text:style-name="T11">and</text:span> the Hivites, and the Jebusites: and I will cut them off.</text:p>
          </table:table-cell>
          <table:table-cell table:style-name="Table1.C7" office:value-type="string">
            <text:list text:continue-list="list3162637288" text:style-name="L2">
              <text:list-item>
                <text:p text:style-name="P26">The “a” in Angel made lowercase</text:p>
              </text:list-item>
              <text:list-item>
                <text:p text:style-name="P27">“e” removed from goe</text:p>
              </text:list-item>
              <text:list-item>
                <text:p text:style-name="P27">“<text:span text:style-name="T20">and” added before “the Hivites”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28">The Holy Bible Universitie of <text:span text:style-name="T17">Cambridge</text:span>, 1637</text:p>
            <text:p text:style-name="P28">(HathiTrust)</text:p>
            <text:p text:style-name="P28"/>
            <text:p text:style-name="P28">Printed by Thomas Buck &amp; Roger Daniel</text:p>
          </table:table-cell>
          <table:table-cell table:style-name="Table1.B8" office:value-type="string">
            <text:p text:style-name="P29"><draw:frame draw:style-name="fr2" draw:name="Image4" text:anchor-type="as-char" svg:width="4.3134in" svg:height="1.302in" draw:z-index="2"><draw:image xlink:href="Pictures/100000010000019E0000007DC0A76DD1.png" xlink:type="simple" xlink:show="embed" xlink:actuate="onLoad" draw:mime-type="image/png"/></draw:frame></text:p>
            <text:p text:style-name="P30">23 For mine Angel shall go before thee, and bring thee in unto the Amorites, and the Hittites, and the Perizzites, and the Canaanites, <text:span text:style-name="T11">and</text:span> the Hivites, and the Jebusites: and I will cut them off.</text:p>
          </table:table-cell>
          <table:table-cell table:style-name="Table1.C8" office:value-type="string">
            <text:list text:style-name="L5">
              <text:list-item>
                <text:p text:style-name="P31">“<text:span text:style-name="T21">e” removed from “goe”</text:span></text:p>
              </text:list-item>
              <text:list-item>
                <text:p text:style-name="P31">“<text:span text:style-name="T22">and” added before “the Hivites”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32">Oxford 1675 (couldn’t find digital version)</text:p>
          </table:table-cell>
          <table:table-cell table:style-name="Table1.B9" office:value-type="string">
            <text:p text:style-name="P33">Appears to have the same Catholic bondage and heresies inserted before the Biblical text as the Cambridge 1637 edition</text:p>
          </table:table-cell>
          <table:table-cell table:style-name="Table1.C9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The Holy Bible</text:p>
            <text:p text:style-name="P35">1769 Oxford edition</text:p>
          </table:table-cell>
          <table:table-cell table:style-name="Table1.B9" office:value-type="string">
            <text:p text:style-name="P29"><draw:frame draw:style-name="fr1" draw:name="Image6" text:anchor-type="as-char" svg:width="4.0417in" svg:height="1.1098in" draw:z-index="5"><draw:image xlink:href="Pictures/10000001000001EF00000088E88DC6E5.png" xlink:type="simple" xlink:show="embed" xlink:actuate="onLoad" draw:mime-type="image/png"/></draw:frame></text:p>
            <text:p text:style-name="P36">23 For mine Angel shall go before thee, and bring thee in unto the Amorites, and the Hittites, and the Perizzites, and the Canaanites, the Hivites, and the Jebusites: and I will cut them off.</text:p>
          </table:table-cell>
          <table:table-cell table:style-name="Table1.C9" office:value-type="string">
            <text:list text:style-name="L6">
              <text:list-item>
                <text:p text:style-name="P37">“<text:span text:style-name="T23">e” removed from “goe”</text:span></text:p>
              </text:list-item>
            </text:list>
          </table:table-cell>
        </table:table-row>
        <table:table-row>
          <table:table-cell table:style-name="Table1.A11" office:value-type="string">
            <text:p text:style-name="Table_20_Contents">Authorized King James Version</text:p>
            <text:p text:style-name="Table_20_Contents">Pure <text:span text:style-name="T17">Cambridge</text:span> Edition <text:span text:style-name="T24">(Bible protector)</text:span></text:p>
          </table:table-cell>
          <table:table-cell table:style-name="Table1.B11" office:value-type="string">
            <text:p text:style-name="Table_20_Contents">23 For mine Angel shall go before thee, and bring thee in unto the Amorites, and the Hittites, and the Perizzites, and the Canaanites, <text:span text:style-name="T11">and</text:span> the Hivites, and the Jebusites: and I will cut them off.</text:p>
          </table:table-cell>
          <table:table-cell table:style-name="Table1.C11" office:value-type="string">
            <text:list text:style-name="L7">
              <text:list-item>
                <text:p text:style-name="P38"><text:span text:style-name="T25">“</text:span><text:span text:style-name="T26">and” added before “the Hivites”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20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10:27:33.081512500</meta:creation-date>
    <dc:title>default</dc:title>
    <meta:editing-duration>PT3H37M41S</meta:editing-duration>
    <meta:editing-cycles>72</meta:editing-cycles>
    <meta:generator>LibreOffice/26.2.4.2$Linux_X86_64 LibreOffice_project/64a984c51f4702dbd3710b13428c673a2f1292e7</meta:generator>
    <meta:initial-creator>William K. McDannell Jr.</meta:initial-creator>
    <dc:date>2026-07-11T12:19:54.033277052</dc:date>
    <meta:document-statistic meta:table-count="1" meta:image-count="6" meta:object-count="0" meta:page-count="1" meta:paragraph-count="52" meta:word-count="561" meta:character-count="3158" meta:non-whitespace-character-count="2659"/>
    <meta:template xlink:type="simple" xlink:actuate="onRequest" xlink:title="default" xlink:href="../../../../AppData/Roaming/LibreOffice/4/user/template/default.ott" meta:date="2025-09-18T10:27:32.814265200"/>
  </office:meta>
</office:document-meta>
</file>