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7.7in" table:align="margins"/>
    </style:style>
    <style:style style:name="Table2.A" style:family="table-column">
      <style:table-column-properties style:column-width="7.7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4" style:family="table">
      <style:table-properties style:width="7.7in" table:align="margins"/>
    </style:style>
    <style:style style:name="Table4.A" style:family="table-column">
      <style:table-column-properties style:column-width="4.0264in" style:rel-column-width="34267*"/>
    </style:style>
    <style:style style:name="Table4.B" style:family="table-column">
      <style:table-column-properties style:column-width="3.6736in" style:rel-column-width="312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style:vertical-align="middle"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1" style:family="table">
      <style:table-properties style:width="7.7in" fo:break-before="page" table:align="margins"/>
    </style:style>
    <style:style style:name="Table1.A" style:family="table-column">
      <style:table-column-properties style:column-width="4.9153in" style:rel-column-width="41835*"/>
    </style:style>
    <style:style style:name="Table1.B" style:family="table-column">
      <style:table-column-properties style:column-width="2.7847in" style:rel-column-width="23700*"/>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style:vertical-align="middle"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style:vertical-align="middle"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Gabriela Nerd Font" fo:font-weight="normal" officeooo:rsid="005c1935" officeooo:paragraph-rsid="005c1935" style:font-weight-asian="normal" style:font-weight-complex="normal"/>
    </style:style>
    <style:style style:name="P2" style:family="paragraph" style:parent-style-name="Standard">
      <style:paragraph-properties fo:text-align="center" style:justify-single-word="false"/>
      <style:text-properties style:font-name="Liberation Sans" officeooo:rsid="001f2028" officeooo:paragraph-rsid="001f2028"/>
    </style:style>
    <style:style style:name="P3" style:family="paragraph" style:parent-style-name="Standard" style:list-style-name="L1">
      <style:paragraph-properties fo:text-align="left" style:justify-single-word="false"/>
      <style:text-properties style:font-name="Liberation Sans" officeooo:rsid="0092244e" officeooo:paragraph-rsid="0092244e"/>
    </style:style>
    <style:style style:name="P4" style:family="paragraph" style:parent-style-name="Table_20_Contents">
      <style:paragraph-properties fo:text-align="center" style:justify-single-word="false"/>
      <style:text-properties fo:font-weight="normal" officeooo:rsid="0020e4db" officeooo:paragraph-rsid="0020e4db" style:font-weight-asian="normal" style:font-weight-complex="normal"/>
    </style:style>
    <style:style style:name="P5" style:family="paragraph" style:parent-style-name="Table_20_Contents">
      <style:paragraph-properties fo:text-align="left" style:justify-single-word="false"/>
      <style:text-properties officeooo:paragraph-rsid="00698080"/>
    </style:style>
    <style:style style:name="P6" style:family="paragraph" style:parent-style-name="Table_20_Contents">
      <style:paragraph-properties fo:text-align="left" style:justify-single-word="false"/>
      <style:text-properties officeooo:paragraph-rsid="00637707" fo:background-color="transparent"/>
    </style:style>
    <style:style style:name="P7" style:family="paragraph" style:parent-style-name="Standard" style:list-style-name="L2"/>
    <style:style style:name="P8" style:family="paragraph" style:parent-style-name="Table_20_Contents">
      <style:paragraph-properties fo:text-align="left" style:justify-single-word="false"/>
      <style:text-properties fo:color="#127622" loext:opacity="100%" style:font-name="Gabriela Nerd Font" officeooo:paragraph-rsid="0099b3c0" fo:background-color="transparent"/>
    </style:style>
    <style:style style:name="P9" style:family="paragraph" style:parent-style-name="Table_20_Contents">
      <style:paragraph-properties fo:text-align="left" style:justify-single-word="false"/>
      <style:text-properties officeooo:paragraph-rsid="0099b3c0"/>
    </style:style>
    <style:style style:name="P10" style:family="paragraph" style:parent-style-name="Table_20_Contents">
      <style:paragraph-properties fo:text-align="left" style:justify-single-word="false"/>
      <style:text-properties officeooo:rsid="002dcb76" officeooo:paragraph-rsid="0099b3c0"/>
    </style:style>
    <style:style style:name="P11" style:family="paragraph" style:parent-style-name="Table_20_Contents" style:list-style-name="L3">
      <style:paragraph-properties fo:text-align="left" style:justify-single-word="false"/>
      <style:text-properties officeooo:paragraph-rsid="0099b3c0"/>
    </style:style>
    <style:style style:name="P12" style:family="paragraph" style:parent-style-name="Table_20_Contents" style:list-style-name="L3">
      <style:paragraph-properties fo:text-align="left" style:justify-single-word="false"/>
      <style:text-properties officeooo:rsid="003171ef" officeooo:paragraph-rsid="0099b3c0"/>
    </style:style>
    <style:style style:name="P13" style:family="paragraph" style:parent-style-name="Table_20_Contents" style:list-style-name="L3">
      <style:paragraph-properties fo:text-align="left" style:justify-single-word="false"/>
      <style:text-properties officeooo:rsid="00783295" officeooo:paragraph-rsid="0099b3c0"/>
    </style:style>
    <style:style style:name="P14" style:family="paragraph" style:parent-style-name="Text_20_body">
      <style:text-properties officeooo:paragraph-rsid="0065a438"/>
    </style:style>
    <style:style style:name="P15" style:family="paragraph" style:parent-style-name="Table_20_Contents">
      <style:paragraph-properties fo:text-align="left" style:justify-single-word="false"/>
      <style:text-properties fo:color="#127622" loext:opacity="100%" style:font-name="Gabriela Nerd Font" officeooo:paragraph-rsid="006df79d" fo:background-color="transparent"/>
    </style:style>
    <style:style style:name="P16" style:family="paragraph" style:parent-style-name="Table_20_Contents">
      <style:paragraph-properties fo:text-align="left" style:justify-single-word="false"/>
      <style:text-properties style:use-window-font-color="true" loext:opacity="0%" fo:font-weight="normal" officeooo:paragraph-rsid="006df79d" style:font-weight-asian="normal" style:font-weight-complex="normal"/>
    </style:style>
    <style:style style:name="P17" style:family="paragraph" style:parent-style-name="Table_20_Contents" style:list-style-name="L3">
      <style:paragraph-properties fo:text-align="left" style:justify-single-word="false"/>
      <style:text-properties officeooo:rsid="003e29e7" officeooo:paragraph-rsid="006df79d"/>
    </style:style>
    <style:style style:name="P18" style:family="paragraph" style:parent-style-name="Table_20_Contents" style:list-style-name="L3">
      <style:paragraph-properties fo:text-align="left" style:justify-single-word="false"/>
      <style:text-properties officeooo:rsid="0081c3a6" officeooo:paragraph-rsid="0081c3a6"/>
    </style:style>
    <style:style style:name="P19" style:family="paragraph" style:parent-style-name="Table_20_Contents" style:list-style-name="L3">
      <style:paragraph-properties fo:text-align="left" style:justify-single-word="false"/>
      <style:text-properties officeooo:rsid="007b821b" officeooo:paragraph-rsid="007b821b"/>
    </style:style>
    <style:style style:name="P20" style:family="paragraph" style:parent-style-name="Table_20_Contents">
      <style:paragraph-properties fo:text-align="left" style:justify-single-word="false"/>
      <style:text-properties officeooo:paragraph-rsid="006df79d"/>
    </style:style>
    <style:style style:name="P21" style:family="paragraph" style:parent-style-name="Table_20_Contents">
      <style:paragraph-properties fo:text-align="left" style:justify-single-word="false"/>
    </style:style>
    <style:style style:name="P22" style:family="paragraph" style:parent-style-name="Table_20_Contents">
      <style:paragraph-properties fo:text-align="left" style:justify-single-word="false"/>
      <style:text-properties officeooo:paragraph-rsid="004c4ead"/>
    </style:style>
    <style:style style:name="P23" style:family="paragraph" style:parent-style-name="Table_20_Contents">
      <style:paragraph-properties fo:text-align="left" style:justify-single-word="false"/>
      <style:text-properties fo:color="#127622" loext:opacity="100%" style:font-name="Gabriela Nerd Font" officeooo:paragraph-rsid="00637707" fo:background-color="transparent"/>
    </style:style>
    <style:style style:name="P24" style:family="paragraph" style:parent-style-name="Table_20_Contents">
      <style:paragraph-properties fo:text-align="left" style:justify-single-word="false"/>
      <style:text-properties officeooo:paragraph-rsid="004e0320"/>
    </style:style>
    <style:style style:name="P25" style:family="paragraph" style:parent-style-name="Table_20_Contents" style:list-style-name="L4">
      <style:paragraph-properties fo:text-align="left" style:justify-single-word="false"/>
      <style:text-properties officeooo:paragraph-rsid="004a8ffc"/>
    </style:style>
    <style:style style:name="P26" style:family="paragraph" style:parent-style-name="Table_20_Contents" style:list-style-name="L4">
      <style:paragraph-properties fo:text-align="left" style:justify-single-word="false"/>
      <style:text-properties officeooo:rsid="00811cac" officeooo:paragraph-rsid="00811cac"/>
    </style:style>
    <style:style style:name="P27" style:family="paragraph" style:parent-style-name="Table_20_Contents" style:list-style-name="L4">
      <style:paragraph-properties fo:text-align="left" style:justify-single-word="false"/>
      <style:text-properties officeooo:rsid="0084c7bf" officeooo:paragraph-rsid="0084c7bf"/>
    </style:style>
    <style:style style:name="P28" style:family="paragraph" style:parent-style-name="Table_20_Contents" style:list-style-name="L4">
      <style:paragraph-properties fo:text-align="left" style:justify-single-word="false"/>
      <style:text-properties officeooo:paragraph-rsid="008905ce"/>
    </style:style>
    <style:style style:name="P29" style:family="paragraph" style:parent-style-name="Table_20_Contents" style:list-style-name="L4">
      <style:paragraph-properties fo:text-align="left" style:justify-single-word="false"/>
      <style:text-properties officeooo:rsid="008fec0f" officeooo:paragraph-rsid="008fec0f"/>
    </style:style>
    <style:style style:name="P30" style:family="paragraph" style:parent-style-name="Table_20_Contents">
      <style:paragraph-properties fo:text-align="left" style:justify-single-word="false"/>
      <style:text-properties officeooo:paragraph-rsid="0046b5ae"/>
    </style:style>
    <style:style style:name="P31" style:family="paragraph" style:parent-style-name="Table_20_Contents">
      <style:paragraph-properties fo:text-align="left" style:justify-single-word="false"/>
      <style:text-properties officeooo:rsid="0046b5ae" officeooo:paragraph-rsid="0046b5ae"/>
    </style:style>
    <style:style style:name="P32" style:family="paragraph" style:parent-style-name="Standard">
      <style:paragraph-properties fo:text-align="left" style:justify-single-word="false"/>
      <style:text-properties style:font-name="Liberation Sans" officeooo:rsid="001f2028" officeooo:paragraph-rsid="001f2028"/>
    </style:style>
    <style:style style:name="T1" style:family="text">
      <style:text-properties officeooo:rsid="00a413c9"/>
    </style:style>
    <style:style style:name="T2" style:family="text">
      <style:text-properties officeooo:rsid="00965031"/>
    </style:style>
    <style:style style:name="T3" style:family="text">
      <style:text-properties officeooo:rsid="00b02cb7"/>
    </style:style>
    <style:style style:name="T4" style:family="text">
      <style:text-properties officeooo:rsid="0054bcf2"/>
    </style:style>
    <style:style style:name="T5" style:family="text">
      <style:text-properties officeooo:rsid="005da45a"/>
    </style:style>
    <style:style style:name="T6" style:family="text">
      <style:text-properties officeooo:rsid="006a8ae0"/>
    </style:style>
    <style:style style:name="T7" style:family="text">
      <style:text-properties fo:color="#127622" loext:opacity="100%" style:font-name="Gabriela Nerd Font" fo:background-color="transparent" loext:char-shading-value="0"/>
    </style:style>
    <style:style style:name="T8" style:family="text">
      <style:text-properties style:text-position="33% 80%"/>
    </style:style>
    <style:style style:name="T9" style:family="text">
      <style:text-properties fo:background-color="#ffff00" loext:char-shading-value="0"/>
    </style:style>
    <style:style style:name="T10" style:family="text">
      <style:text-properties fo:font-style="italic"/>
    </style:style>
    <style:style style:name="T11" style:family="text">
      <style:text-properties fo:background-color="transparent" loext:char-shading-value="0"/>
    </style:style>
    <style:style style:name="T12" style:family="text">
      <style:text-properties style:text-position="super 58%" officeooo:rsid="00293bba" fo:background-color="transparent" loext:char-shading-value="0"/>
    </style:style>
    <style:style style:name="T13" style:family="text">
      <style:text-properties style:text-position="super 58%" officeooo:rsid="00682540" fo:background-color="transparent" loext:char-shading-value="0"/>
    </style:style>
    <style:style style:name="T14" style:family="text">
      <style:text-properties style:text-position="super 58%" officeooo:rsid="00686b81" fo:background-color="transparent" loext:char-shading-value="0"/>
    </style:style>
    <style:style style:name="T15" style:family="text">
      <style:text-properties fo:color="#127622" loext:opacity="100%" style:font-name="Gabriela Nerd Font"/>
    </style:style>
    <style:style style:name="T16" style:family="text">
      <style:text-properties style:text-position="super 58%" officeooo:rsid="00637707"/>
    </style:style>
    <style:style style:name="T17" style:family="text">
      <style:text-properties style:text-position="super 58%" officeooo:rsid="00682540"/>
    </style:style>
    <style:style style:name="T18" style:family="text">
      <style:text-properties style:text-position="super 58%" officeooo:rsid="00686b81"/>
    </style:style>
    <style:style style:name="T19" style:family="text">
      <style:text-properties style:text-position="super 58%" officeooo:rsid="005f4d07" fo:background-color="transparent" loext:char-shading-value="0"/>
    </style:style>
    <style:style style:name="T20" style:family="text">
      <style:text-properties officeooo:rsid="006e926c"/>
    </style:style>
    <style:style style:name="T21" style:family="text">
      <style:text-properties officeooo:rsid="003ca422"/>
    </style:style>
    <style:style style:name="T22" style:family="text">
      <style:text-properties style:text-position="super 58%" officeooo:rsid="0073f348"/>
    </style:style>
    <style:style style:name="T23" style:family="text">
      <style:text-properties style:text-position="super 58%" officeooo:rsid="002f7fdb" fo:background-color="transparent" loext:char-shading-value="0"/>
    </style:style>
    <style:style style:name="T24" style:family="text">
      <style:text-properties style:text-position="super 58%" officeooo:rsid="002f7fdb"/>
    </style:style>
    <style:style style:name="T25" style:family="text">
      <style:text-properties style:text-position="super 58%" officeooo:rsid="0060d502"/>
    </style:style>
    <style:style style:name="T26" style:family="text">
      <style:text-properties style:text-position="super 58%" officeooo:rsid="0060d502" fo:background-color="transparent" loext:char-shading-value="0"/>
    </style:style>
    <style:style style:name="T27" style:family="text">
      <style:text-properties officeooo:rsid="003171ef"/>
    </style:style>
    <style:style style:name="T28" style:family="text">
      <style:text-properties officeooo:rsid="0073f348"/>
    </style:style>
    <style:style style:name="T29" style:family="text">
      <style:text-properties style:text-position="0% 100%" officeooo:rsid="0073f348"/>
    </style:style>
    <style:style style:name="T30" style:family="text">
      <style:text-properties style:text-position="0% 100%" officeooo:rsid="00745717"/>
    </style:style>
    <style:style style:name="T31" style:family="text">
      <style:text-properties style:text-position="0% 100%" officeooo:rsid="007566f5"/>
    </style:style>
    <style:style style:name="T32" style:family="text">
      <style:text-properties officeooo:rsid="0078e086"/>
    </style:style>
    <style:style style:name="T33" style:family="text">
      <style:text-properties style:text-position="super 58%" officeooo:rsid="007c8d92"/>
    </style:style>
    <style:style style:name="T34" style:family="text">
      <style:text-properties style:text-position="super 58%" officeooo:rsid="003e29e7"/>
    </style:style>
    <style:style style:name="T35" style:family="text">
      <style:text-properties style:text-position="super 58%" officeooo:rsid="00593452"/>
    </style:style>
    <style:style style:name="T36" style:family="text">
      <style:text-properties officeooo:rsid="0041198f"/>
    </style:style>
    <style:style style:name="T37" style:family="text">
      <style:text-properties officeooo:rsid="003fb2bd"/>
    </style:style>
    <style:style style:name="T38" style:family="text">
      <style:text-properties officeooo:rsid="0097991f"/>
    </style:style>
    <style:style style:name="T39" style:family="text">
      <style:text-properties officeooo:rsid="0097b071"/>
    </style:style>
    <style:style style:name="T40" style:family="text">
      <style:text-properties officeooo:rsid="0080a84a"/>
    </style:style>
    <style:style style:name="T41" style:family="text">
      <style:text-properties officeooo:rsid="0065a438"/>
    </style:style>
    <style:style style:name="T42" style:family="text">
      <style:text-properties style:text-position="super 58%" officeooo:rsid="007bef55" fo:background-color="transparent" loext:char-shading-value="0"/>
    </style:style>
    <style:style style:name="T43" style:family="text">
      <style:text-properties style:text-position="super 58%" officeooo:rsid="007da34d"/>
    </style:style>
    <style:style style:name="T44" style:family="text">
      <style:text-properties style:text-position="super 58%" officeooo:rsid="007e8108" fo:background-color="transparent" loext:char-shading-value="0"/>
    </style:style>
    <style:style style:name="T45" style:family="text">
      <style:text-properties fo:font-style="italic" fo:background-color="#ffff00" loext:char-shading-value="0"/>
    </style:style>
    <style:style style:name="T46" style:family="text">
      <style:text-properties style:text-position="super 58%" officeooo:rsid="008d6fa0" fo:background-color="transparent" loext:char-shading-value="0"/>
    </style:style>
    <style:style style:name="T47" style:family="text">
      <style:text-properties style:text-position="super 58%" officeooo:rsid="009100d4" fo:background-color="transparent" loext:char-shading-value="0"/>
    </style:style>
    <style:style style:name="T48" style:family="text">
      <style:text-properties officeooo:rsid="0045620a"/>
    </style:style>
    <style:style style:name="T49" style:family="text">
      <style:text-properties officeooo:rsid="004a8ffc"/>
    </style:style>
    <style:style style:name="T50" style:family="text">
      <style:text-properties officeooo:rsid="0084b1b3"/>
    </style:style>
    <style:style style:name="T51" style:family="text">
      <style:text-properties officeooo:rsid="0086a2cb"/>
    </style:style>
    <style:style style:name="T52" style:family="text">
      <style:text-properties officeooo:rsid="008905ce"/>
    </style:style>
    <style:style style:name="T53" style:family="text">
      <style:text-properties officeooo:rsid="008eeb1b"/>
    </style:style>
    <style:style style:name="T54" style:family="text">
      <style:text-properties officeooo:rsid="008b2b19"/>
    </style:style>
    <style:style style:name="T55" style:family="text">
      <style:text-properties officeooo:rsid="008c9cca"/>
    </style:style>
    <style:style style:name="T56" style:family="text">
      <style:text-properties style:text-position="super 58%" style:font-name="Liberation Sans1" officeooo:rsid="00913e2a" fo:background-color="transparent" loext:char-shading-value="0"/>
    </style:style>
    <style:style style:name="T57" style:family="text">
      <style:text-properties style:text-position="super 58%" officeooo:rsid="00913e2a" fo:background-color="transparent" loext:char-shading-value="0"/>
    </style:style>
    <style:style style:name="T58" style:family="text">
      <style:text-properties officeooo:rsid="007e827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re did the Philistines come from?</text:p>
      <text:p text:style-name="P2"/>
      <text:list text:style-name="L1">
        <text:list-item>
          <text:p text:style-name="P3">The Philistines <text:span text:style-name="T1">are</text:span> descendants of Mizraim son of Ham son of Noah.</text:p>
        </text:list-item>
        <text:list-item>
          <text:p text:style-name="P3">They migrated, similar to some of the<text:span text:style-name="T2">ir</text:span> brethren, from a place call<text:span text:style-name="T3">ed</text:span> “Caphtor”.</text:p>
        </text:list-item>
      </text:list>
      <text:p text:style-name="P2"/>
      <table:table table:name="Table2" table:style-name="Table2">
        <table:table-column table:style-name="Table2.A"/>
        <table:table-row>
          <table:table-cell table:style-name="Table2.A1" office:value-type="string">
            <text:p text:style-name="P4"><text:span text:style-name="T4">Noah→</text:span>Ham→<text:span text:style-name="T5">Mizraim→Casluhim→Philistim/</text:span><text:span text:style-name="T6">Philistines</text:span></text:p>
          </table:table-cell>
        </table:table-row>
        <table:table-row>
          <table:table-cell table:style-name="Table2.A2" office:value-type="string">
            <text:p text:style-name="P5"><text:span text:style-name="T7">Genesis 10:6-14</text:span><text:line-break/><text:span text:style-name="T8">6</text:span> And the sons of <text:span text:style-name="T9">Ham</text:span>; Cush, and <text:span text:style-name="T9">Mizraim</text:span>, and Phut, and Canaan. <text:line-break/><text:span text:style-name="T8">7</text:span> And the sons of Cush; Seba, and Havilah, and Sabtah, and Raamah, and Sabtecha: and the sons of Raamah; Sheba, and Dedan. <text:line-break/><text:span text:style-name="T8">8</text:span> And Cush begat Nimrod: he began to be a mighty one in the earth. <text:line-break/><text:span text:style-name="T8">9</text:span> He was a mighty hunter before the LORD: wherefore it is said, Even as Nimrod the mighty hunter before the LORD. <text:line-break/><text:span text:style-name="T8">10</text:span> And the beginning of his kingdom was Babel, and Erech, and Accad, and Calneh, in the land of Shinar. <text:line-break/><text:span text:style-name="T8">11</text:span> Out of that land went forth Asshur, and builded Nineveh, and the city Rehoboth, and Calah, <text:line-break/><text:span text:style-name="T8">12</text:span> And Resen between Nineveh and Calah: the same <text:span text:style-name="T10">is</text:span> a great city. <text:line-break/><text:span text:style-name="T8">13</text:span> And <text:span text:style-name="T9">Mizraim</text:span> begat Ludim, and Anamim, and Lehabim, and Naphtuhim, <text:line-break/><text:span text:style-name="T8">14</text:span> <text:span text:style-name="T11">And Pathrusim, and </text:span><text:span text:style-name="T9">Casluhim, (out of whom came Philistim</text:span><text:span text:style-name="T12">H6430</text:span><text:span text:style-name="T11">,) and Caphtorim</text:span><text:span text:style-name="T13">H3732 </text:span><text:span text:style-name="T14">(H3731)</text:span><text:span text:style-name="T11">.</text:span></text:p>
            <text:p text:style-name="P6"><text:line-break/><text:span text:style-name="T15">1 Chronicles 1:8-12</text:span><text:line-break/><text:span text:style-name="T8">8</text:span> The sons of <text:span text:style-name="T9">Ham</text:span>; Cush, and <text:span text:style-name="T9">Mizraim</text:span>, Put, and Canaan. <text:line-break/><text:span text:style-name="T8">9</text:span> And the sons of Cush; Seba, and Havilah, and Sabta, and Raamah, and Sabtecha. And the sons of Raamah; Sheba, and Dedan. <text:line-break/><text:span text:style-name="T8">10</text:span> And Cush begat Nimrod: he began to be mighty upon the earth. <text:line-break/><text:span text:style-name="T8">11</text:span> And <text:span text:style-name="T9">Mizraim</text:span> begat Ludim, and Anamim, and Lehabim, and Naphtuhim, <text:line-break/><text:span text:style-name="T8">12</text:span> And Pathrusim, and <text:span text:style-name="T9">Casluhim, (of whom came the Philistines</text:span><text:span text:style-name="T16">H6430</text:span>,) and Caphthorim<text:span text:style-name="T17">H3732 </text:span><text:span text:style-name="T18">(H3731)</text:span>.</text:p>
          </table:table-cell>
        </table:table-row>
      </table:table>
      <text:list text:style-name="L2">
        <text:list-item>
          <text:p text:style-name="P7">Caphtorim/Caphthorim is one of Casluhim’s brothers.</text:p>
        </text:list-item>
      </text:list>
      <text:p text:style-name="Standard"/>
      <text:p text:style-name="Standard"/>
      <text:p text:style-name="Standard"/>
      <table:table table:name="Table4" table:style-name="Table4">
        <table:table-column table:style-name="Table4.A"/>
        <table:table-column table:style-name="Table4.B"/>
        <table:table-row>
          <table:table-cell table:style-name="Table4.A1" office:value-type="string">
            <text:p text:style-name="P8">Exodus 13:17</text:p>
            <text:p text:style-name="P9">And it came to pass, when Pharaoh had let the people go, that God led them not through the way of the land of the <text:span text:style-name="T9">Philistines</text:span><text:span text:style-name="T19">H6430</text:span>, although that was near; for God said, Lest peradventure the people repent when they see war, and they return to Egypt:</text:p>
          </table:table-cell>
          <table:table-cell table:style-name="Table4.B1" office:value-type="string">
            <text:p text:style-name="P10">The shortest route to Canaan would have been following the trade route along the Mediterranean coastline <text:span text:style-name="T20">(northern Sinai peninsula)</text:span> <text:span text:style-name="T21">indicating</text:span> that the Philistines were settled west of the land of Canaan at least 40 years before the Israelites.</text:p>
          </table:table-cell>
        </table:table-row>
        <table:table-row>
          <table:table-cell table:style-name="Table4.A2" office:value-type="string">
            <text:p text:style-name="P8">Deuteronomy 2:23</text:p>
            <text:p text:style-name="P9">And the Avims<text:span text:style-name="T22">H5761</text:span> which dwelt in Hazerim, even unto<text:span text:style-name="T11"> Azzah</text:span><text:span text:style-name="T23">H5</text:span><text:span text:style-name="T24">804</text:span>, the Caphtorims<text:span text:style-name="T25">H3732</text:span>, which came forth out of <text:span text:style-name="T9">Caphtor</text:span><text:span text:style-name="T26">H3731</text:span>, destroyed them, and dwelt in their stead.)</text:p>
          </table:table-cell>
          <table:table-cell table:style-name="Table4.B2" office:value-type="string">
            <text:list text:style-name="L3">
              <text:list-item>
                <text:p text:style-name="P11"><text:span text:style-name="T27">Hazerim is unknown. </text:span><text:span text:style-name="T28">The Avites</text:span><text:span text:style-name="T22">H5761</text:span><text:span text:style-name="T29"> are listed in </text:span><text:span text:style-name="T7">Joshua 13:3</text:span><text:span text:style-name="T29"> as land which is yet to be claimed. </text:span><text:span text:style-name="T30">In </text:span><text:span text:style-name="T7">Joshua 18:23</text:span><text:span text:style-name="T30"> that land </text:span><text:span text:style-name="T31">is listed a</text:span><text:span text:style-name="T30">s given to the tribe of Benjamin.</text:span></text:p>
              </text:list-item>
              <text:list-item>
                <text:p text:style-name="P12">Azzah is another name for Gaza.</text:p>
              </text:list-item>
              <text:list-item>
                <text:p text:style-name="P13"><text:span text:style-name="T32">T</text:span>he Caphtorims destroyed the Avims and dwelt in their stead.</text:p>
              </text:list-item>
            </text:list>
          </table:table-cell>
        </table:table-row>
      </table:table>
      <text:p text:style-name="P14"/>
      <table:table table:name="Table1" table:style-name="Table1">
        <table:table-column table:style-name="Table1.A"/>
        <table:table-column table:style-name="Table1.B"/>
        <table:table-row>
          <table:table-cell table:style-name="Table1.A1" office:value-type="string">
            <text:p text:style-name="P15">Jeremiah 47:4</text:p>
            <text:p text:style-name="P16">Because of the day that cometh to spoil all the Philistines<text:span text:style-name="T33">H6430</text:span>, and to cut off from Tyrus and Zidon every helper that remaineth: for the LORD will spoil the Philistines<text:span text:style-name="T33">H6430</text:span>, the remnant of the <text:span text:style-name="T9">country</text:span><text:span text:style-name="T34">H339</text:span> of <text:span text:style-name="T9">Caphtor</text:span><text:span text:style-name="T35">H3731</text:span>.</text:p>
          </table:table-cell>
          <table:table-cell table:style-name="Table1.B1" table:number-rows-spanned="2" office:value-type="string">
            <text:list text:continue-numbering="true" text:style-name="L3">
              <text:list-item>
                <text:p text:style-name="P17">This is the only instance of H339 being translated <text:span text:style-name="T36">as</text:span> country. Everywhere else it is translated <text:span text:style-name="T36">as</text:span> “isles” <text:span text:style-name="T37">or “islands” </text:span><text:span text:style-name="T38">(35x)</text:span><text:span text:style-name="T37">. </text:span><text:span text:style-name="T39">This is our only hint from the Bible as to the location of “Caphtor”.</text:span></text:p>
              </text:list-item>
              <text:list-item>
                <text:p text:style-name="P18">And so the “isles/island of Caphtor” is probably not a far stretch.</text:p>
              </text:list-item>
              <text:list-item>
                <text:p text:style-name="P19"><text:span text:style-name="T40">T</text:span>he children of <text:span text:style-name="T41">Casluhim </text:span>and <text:span text:style-name="T41">Caphtorim </text:span>dwelt near each other for a time <text:span text:style-name="T40">on Caphtor and they both left.</text:span></text:p>
              </text:list-item>
            </text:list>
          </table:table-cell>
        </table:table-row>
        <table:table-row>
          <table:table-cell table:style-name="Table1.A2" office:value-type="string">
            <text:p text:style-name="P15">Amos 9:7</text:p>
            <text:p text:style-name="P20">Are ye not as children of the Ethiopians unto me, O children of Israel? saith the LORD. Have not I brought up Israel out of the land of Egypt? and the <text:span text:style-name="T9">Philistines</text:span><text:span text:style-name="T42">H6430</text:span><text:span text:style-name="T9"> from Caphtor</text:span><text:span text:style-name="T42">H3731</text:span>, and the Syrians from Kir?</text:p>
          </table:table-cell>
          <table:covered-table-cell table:style-name="Table1.B1"/>
        </table:table-row>
        <table:table-row>
          <table:table-cell table:style-name="Table1.A3" office:value-type="string">
            <text:p text:style-name="P21"><text:span text:style-name="T7">Zephaniah 2:4-7</text:span><text:line-break/><text:span text:style-name="T8">4</text:span> For Gaza<text:span text:style-name="T43">H5804</text:span> shall be forsaken, and Ashkelon a desolation: they shall drive out Ashdod at the noon day, and Ekron shall be rooted up. <text:line-break/><text:span text:style-name="T8">5</text:span> Woe unto the inhabitants of the sea coast, the nation of the <text:span text:style-name="T9">Cherethites</text:span><text:span text:style-name="T44">H3774</text:span>! the word of the LORD <text:span text:style-name="T10">is</text:span> against you; O Canaan, the land of the <text:span text:style-name="T9">Philistines</text:span>, I will even destroy thee, that there shall be no inhabitant.</text:p>
            <text:p text:style-name="P21"/>
            <text:p text:style-name="P22"><text:span text:style-name="T7">1 Samuel 30:13-16</text:span><text:line-break/><text:span text:style-name="T8">13</text:span> And David said unto him, To whom <text:span text:style-name="T10">belongest</text:span> thou? and whence <text:span text:style-name="T10">art</text:span> thou? And he said, I <text:span text:style-name="T10">am</text:span> a young man of Egypt, servant to an <text:span text:style-name="T9">Amalekite</text:span>; and my master left me, because three days agone I fell sick. <text:line-break/><text:span text:style-name="T8">14</text:span> <text:span text:style-name="T9">We made an invasion </text:span><text:span text:style-name="T45">upon</text:span><text:span text:style-name="T9"> the south of the Cherethites</text:span><text:span text:style-name="T46">H3774</text:span>, and upon <text:span text:style-name="T10">the coast</text:span> which <text:span text:style-name="T10">belongeth</text:span> to Judah, and upon the south of Caleb; and we burned Ziklag with fire. <text:line-break/><text:span text:style-name="T8">15</text:span> And David said to him, Canst thou bring me down to this company? And he said, Swear unto me by God, that thou wilt neither kill me, nor deliver me into the hands of my master, and I will bring thee down to this company. <text:line-break/><text:span text:style-name="T8">16</text:span> And when he had brought him down, behold, <text:span text:style-name="T10">they were</text:span> spread abroad upon all the earth, eating and drinking, and dancing, because of all the great spoil that they had taken out of the land of the <text:span text:style-name="T9">Philistines</text:span>, and out of the land of Judah.</text:p>
            <text:p text:style-name="P22"/>
            <text:p text:style-name="P23">Ezekiel 25:16</text:p>
            <text:p text:style-name="P24">Therefore thus saith the Lord GOD; Behold, I will stretch out mine hand upon the <text:span text:style-name="T9">Philistines</text:span><text:span text:style-name="T47">H6430</text:span>, and I will cut off the <text:span text:style-name="T9">Cherethims</text:span><text:span text:style-name="T47">H3774</text:span>, and destroy the remnant of the sea coast.</text:p>
          </table:table-cell>
          <table:table-cell table:style-name="Table1.B3" office:value-type="string">
            <text:list text:style-name="L4">
              <text:list-item>
                <text:p text:style-name="P25"><text:span text:style-name="T48">The Philistines are </text:span><text:span text:style-name="T49">also </text:span><text:span text:style-name="T48">referred to as “Cherethites” </text:span><text:span text:style-name="T49">and</text:span> “Cherethims”.</text:p>
              </text:list-item>
              <text:list-item>
                <text:p text:style-name="P26">Since they are dwelling on the sea coast this indicates that <text:span text:style-name="T50">this is chronologically </text:span>after their departure from Caphtor.</text:p>
              </text:list-item>
              <text:list-item>
                <text:p text:style-name="P27">The Cherethites <text:span text:style-name="T51">were from</text:span> Gath so the young man is describing the Amalekites attacking the south of Gath.</text:p>
              </text:list-item>
              <text:list-item>
                <text:p text:style-name="P28"><text:span text:style-name="T52">Ziklag </text:span><text:span text:style-name="T53">(~23 miles southwest of Gath) </text:span><text:span text:style-name="T52">was given to David and so v</text:span><text:span text:style-name="T7">16</text:span><text:span text:style-name="T52"> </text:span><text:span text:style-name="T54">reinforces</text:span><text:span text:style-name="T52"> that “the south of the Cherethites” is Philistine </text:span><text:span text:style-name="T55">land</text:span><text:span text:style-name="T52">.</text:span></text:p>
              </text:list-item>
              <text:list-item>
                <text:p text:style-name="P29">This also tells us that the Amalekites most likely headed northeast through the valley during their invasion.</text:p>
              </text:list-item>
            </text:list>
          </table:table-cell>
        </table:table-row>
        <table:table-row>
          <table:table-cell table:style-name="Table1.A4" office:value-type="string">
            <text:p text:style-name="P23">2 Samuel 15:18</text:p>
            <text:p text:style-name="P30">And all his servants passed on beside him; and all the <text:span text:style-name="T9">Cherethites</text:span><text:span text:style-name="T56">H3774</text:span>, and all the <text:span text:style-name="T9">Pelethites</text:span><text:span text:style-name="T56">H6432</text:span>, and all the <text:span text:style-name="T9">Gittites</text:span><text:span text:style-name="T57">H1663</text:span>, six hundred men which came after him from Gath, passed on before the king.</text:p>
          </table:table-cell>
          <table:table-cell table:style-name="Table1.B3" office:value-type="string">
            <text:p text:style-name="P31">The “Cherethites”, “Pelethites”, and “Gittites” <text:span text:style-name="T58">are all </text:span>Philisti<text:span text:style-name="T58">ans.</text:span></text:p>
          </table:table-cell>
        </table:table-row>
      </table:table>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4T07:13:14.528000000</meta:creation-date>
    <meta:editing-cycles>139</meta:editing-cycles>
    <meta:editing-duration>PT5H36M24S</meta:editing-duration>
    <dc:date>2026-07-11T12:30:16.383715724</dc:date>
    <meta:generator>LibreOffice/26.2.4.2$Linux_X86_64 LibreOffice_project/64a984c51f4702dbd3710b13428c673a2f1292e7</meta:generator>
    <dc:title>Where did the Philistines come from?</dc:title>
    <meta:document-statistic meta:table-count="3" meta:image-count="0" meta:object-count="0" meta:page-count="2" meta:paragraph-count="34" meta:word-count="981" meta:character-count="5550" meta:non-whitespace-character-count="4600"/>
  </office:meta>
</office:document-meta>
</file>