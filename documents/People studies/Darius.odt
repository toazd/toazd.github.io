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zra 4:5</text:p>
            <text:p text:style-name="Table_20_Contents">And hired counsellors against them, to frustrate their purpose, all the days of Cyrus king of Persia, even until the reign of <text:span text:style-name="T1">Darius king of Persia</text:span>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Nehemiah 12:22</text:p>
            <text:p text:style-name="Table_20_Contents">The Levites in the days of Eliashib, Joiada, and Johanan, and Jaddua, were recorded chief of the fathers: also the priests, to the reign of <text:span text:style-name="T1">Darius the Persian</text:span>.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Daniel 5:31</text:p>
            <text:p text:style-name="Table_20_Contents">And <text:span text:style-name="T1">Darius the Median</text:span> took the kingdom, being about threescore and two years old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Daniel 9:1</text:p>
            <text:p text:style-name="Table_20_Contents">In the first year of <text:span text:style-name="T1">Darius the son of Ahasuerus</text:span>, of the seed of the Medes, which was made king over the realm of the Chaldeans;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3:03:01.568025459</meta:creation-date>
    <dc:title>default</dc:title>
    <meta:editing-duration>PT9M56S</meta:editing-duration>
    <meta:editing-cycles>5</meta:editing-cycles>
    <meta:generator>LibreOffice/26.2.0.3$Linux_X86_64 LibreOffice_project/f1632ca95bc60e4a160604f46a6d9de4857c31ac</meta:generator>
    <dc:date>2026-02-24T13:12:59.361404568</dc:date>
    <meta:document-statistic meta:table-count="5" meta:image-count="0" meta:object-count="0" meta:page-count="1" meta:paragraph-count="8" meta:word-count="102" meta:character-count="559" meta:non-whitespace-character-count="465"/>
    <meta:template xlink:type="simple" xlink:actuate="onRequest" xlink:title="default" xlink:href="../../../../../../../../../../../home/wmcdannell/Templates/default.ott" meta:date="2026-02-24T13:03:00.638035268"/>
  </office:meta>
</office:document-meta>
</file>