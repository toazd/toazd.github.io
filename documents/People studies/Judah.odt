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2500000354E8781EDD.png" manifest:media-type="image/png"/>
  <manifest:file-entry manifest:full-path="Pictures/10000001000002E60000024A8112731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b53e1" officeooo:paragraph-rsid="001b53e1"/>
    </style:style>
    <style:style style:name="P2" style:family="paragraph" style:parent-style-name="Standard">
      <style:text-properties style:font-name="Liberation Sans" officeooo:rsid="001ebf44" officeooo:paragraph-rsid="001ebf44"/>
    </style:style>
    <style:style style:name="P3" style:family="paragraph" style:parent-style-name="Standard">
      <style:text-properties style:font-name="Liberation Sans" officeooo:rsid="001f0f26" officeooo:paragraph-rsid="001f0f26"/>
    </style:style>
    <style:style style:name="P4" style:family="paragraph" style:parent-style-name="Standard">
      <style:paragraph-properties fo:text-align="center" style:justify-single-word="false"/>
      <style:text-properties style:font-name="Liberation Sans" officeooo:rsid="001b53e1" officeooo:paragraph-rsid="001b53e1"/>
    </style:style>
    <style:style style:name="P5" style:family="paragraph" style:parent-style-name="Standard">
      <style:text-properties style:font-name="Liberation Sans" style:text-underline-style="solid" style:text-underline-width="auto" style:text-underline-color="font-color" officeooo:rsid="001ebf44" officeooo:paragraph-rsid="001ebf44"/>
    </style:style>
    <style:style style:name="P6" style:family="paragraph" style:parent-style-name="Standard">
      <style:text-properties style:font-name="Liberation Sans" officeooo:rsid="0020e45e" officeooo:paragraph-rsid="0020e45e"/>
    </style:style>
    <style:style style:name="P7" style:family="paragraph" style:parent-style-name="Standard">
      <style:paragraph-properties fo:text-align="center" style:justify-single-word="false"/>
      <style:text-properties style:font-name="Liberation Sans" officeooo:rsid="0020e45e" officeooo:paragraph-rsid="0020e45e"/>
    </style:style>
    <style:style style:name="P8" style:family="paragraph" style:parent-style-name="Standard">
      <style:text-properties officeooo:rsid="0021d9f6" officeooo:paragraph-rsid="0021d9f6"/>
    </style:style>
    <style:style style:name="P9" style:family="paragraph" style:parent-style-name="Standard">
      <style:text-properties officeooo:rsid="00221b4c" officeooo:paragraph-rsid="00221b4c"/>
    </style:style>
    <style:style style:name="P10" style:family="paragraph" style:parent-style-name="Standard">
      <style:text-properties style:text-underline-style="solid" style:text-underline-width="auto" style:text-underline-color="font-color" officeooo:rsid="002753b8" officeooo:paragraph-rsid="002753b8"/>
    </style:style>
    <style:style style:name="P11" style:family="paragraph" style:parent-style-name="Standard">
      <style:text-properties officeooo:rsid="002753b8" officeooo:paragraph-rsid="002753b8"/>
    </style:style>
    <style:style style:name="P12" style:family="paragraph" style:parent-style-name="Standard">
      <style:text-properties officeooo:rsid="00291ee1" officeooo:paragraph-rsid="00291ee1"/>
    </style:style>
    <style:style style:name="T1" style:family="text">
      <style:text-properties style:text-position="super 58%"/>
    </style:style>
    <style:style style:name="T2" style:family="text">
      <style:text-properties officeooo:rsid="001d2a27"/>
    </style:style>
    <style:style style:name="T3" style:family="text">
      <style:text-properties fo:color="#127622" loext:opacity="100%" officeooo:rsid="001d2a27"/>
    </style:style>
    <style:style style:name="T4" style:family="text">
      <style:text-properties officeooo:rsid="001f0f26"/>
    </style:style>
    <style:style style:name="T5" style:family="text">
      <style:text-properties fo:color="#127622" loext:opacity="100%" officeooo:rsid="001f0f26"/>
    </style:style>
    <style:style style:name="T6" style:family="text">
      <style:text-properties fo:color="#127622" loext:opacity="100%"/>
    </style:style>
    <style:style style:name="T7" style:family="text">
      <style:text-properties officeooo:rsid="0022e02a"/>
    </style:style>
    <style:style style:name="T8" style:family="text">
      <style:text-properties officeooo:rsid="00241693"/>
    </style:style>
    <style:style style:name="T9" style:family="text">
      <style:text-properties officeooo:rsid="002a02b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udah</text:p>
      <text:p text:style-name="P1"/>
      <text:p text:style-name="P1">4<text:span text:style-name="T1">th</text:span> born to Jacob &amp; Leah <text:span text:style-name="T2">(</text:span><text:span text:style-name="T3">Genesis 29:35</text:span><text:span text:style-name="T2">)</text:span></text:p>
      <text:p text:style-name="P1"/>
      <text:p text:style-name="P2">After selling their brother Joseph into slavery, Judah travels “down from his brethren” <text:span text:style-name="T4">(</text:span><text:span text:style-name="T5">Genesis 38:1</text:span><text:span text:style-name="T4">) </text:span>from the “vale of Hebron” (<text:span text:style-name="T6">Genesis 37:14</text:span>) to Adullam <text:span text:style-name="T4">which is ~10.5 miles to the north west.</text:span></text:p>
      <text:p text:style-name="P2"/>
      <text:p text:style-name="P3">Hebron sits at an elevation of ~3,000 feet above sea level and Adullam (Tel Adullam) is at ~1,440 feet above sea level (difference in elevation of ~1,500 feet).</text:p>
      <text:p text:style-name="P1"/>
      <text:p text:style-name="P4"><draw:frame draw:style-name="fr1" draw:name="Image1" text:anchor-type="as-char" svg:width="4.4929in" svg:height="3.5484in" draw:z-index="0"><draw:image xlink:href="Pictures/10000001000002E60000024A81127316.png" xlink:type="simple" xlink:show="embed" xlink:actuate="onLoad" draw:mime-type="image/png"/></draw:frame></text:p>
      <text:p text:style-name="P5">Genesis 38</text:p>
      <text:p text:style-name="P2"/>
      <text:p text:style-name="P6">Judah marries the daughter of Shuah the Canaanite. She bears to him 3 sons: Er, Onan, and Shelah. The wife is at Chezib (Aczib) when Shelah is born (which is ~ 3 miles southwest of Adullam) (Genesis 38:5).</text:p>
      <text:p text:style-name="P6"/>
      <text:p text:style-name="P7"><draw:frame draw:style-name="fr1" draw:name="Image2" text:anchor-type="as-char" svg:width="4.25in" svg:height="3.4126in" draw:z-index="1"><draw:image xlink:href="Pictures/100000010000042500000354E8781EDD.png" xlink:type="simple" xlink:show="embed" xlink:actuate="onLoad" draw:mime-type="image/png"/></draw:frame></text:p>
      <text:p text:style-name="Standard"/>
      <text:p text:style-name="Standard"/>
      <text:p text:style-name="P8"><text:soft-page-break/>Er and Onan are slain for their wickedness and displeasing the LORD. Judah sends Tamar back to her father’s house to wait for Shelah to be of age to marry.</text:p>
      <text:p text:style-name="P8"/>
      <text:p text:style-name="P9">Some time later the wife of Judah the daughter of Shuah dies. <text:span text:style-name="T7">Judah heads north ~26 miles to Timnath to sheer his sheep and Tamar seeing that Shelah was grown and she was not given to her to wife dresses as a harlot along the way. </text:span><text:span text:style-name="T8">Judah and Tamar fornicate and about 3 months later it is found out that she is pregnant with twins: Pharez &amp; Zarah.</text:span></text:p>
      <text:p text:style-name="P9"/>
      <text:p text:style-name="P10">Genesis 43</text:p>
      <text:p text:style-name="P11"/>
      <text:p text:style-name="P12">Israel sends his son a second time to Egypt <text:span text:style-name="T9">and Judah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5T09:20:30.433480000</meta:creation-date>
    <dc:title>default</dc:title>
    <meta:editing-duration>PT9H38M21S</meta:editing-duration>
    <meta:editing-cycles>15</meta:editing-cycles>
    <meta:generator>LibreOffice/26.2.4.2$Linux_X86_64 LibreOffice_project/64a984c51f4702dbd3710b13428c673a2f1292e7</meta:generator>
    <dc:date>2026-07-11T12:31:08.486899362</dc:date>
    <meta:document-statistic meta:table-count="0" meta:image-count="2" meta:object-count="0" meta:page-count="2" meta:paragraph-count="12" meta:word-count="220" meta:character-count="1179" meta:non-whitespace-character-count="969"/>
    <meta:template xlink:type="simple" xlink:actuate="onRequest" xlink:title="default" xlink:href="../../../../../AppData/Roaming/LibreOffice/4/user/template/default1.ott" meta:date="2026-01-15T09:20:30.080646900"/>
  </office:meta>
</office:document-meta>
</file>