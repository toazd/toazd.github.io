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700000296F7EAD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-left="0.75pt solid #000000" fo:border-right="0.75pt solid #000000" fo:border-top="0.75pt solid #000000" fo:border-bottom="none"/>
    </style:style>
    <style:style style:name="Table3.A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text-align="left" style:justify-single-word="false"/>
      <style:text-properties fo:color="#127622" loext:opacity="100%"/>
    </style:style>
    <style:style style:name="P2" style:family="paragraph" style:parent-style-name="Table_20_Contents">
      <style:paragraph-properties fo:text-align="left" style:justify-single-word="false"/>
    </style:style>
    <style:style style:name="P3" style:family="paragraph" style:parent-style-name="Text_20_body">
      <style:paragraph-properties fo:text-align="left" style:justify-single-word="false"/>
      <style:text-properties officeooo:paragraph-rsid="0013703b"/>
    </style:style>
    <style:style style:name="P4" style:family="paragraph" style:parent-style-name="Table_20_Contents">
      <style:paragraph-properties fo:text-align="left" style:justify-single-word="false"/>
      <style:text-properties officeooo:paragraph-rsid="0013703b"/>
    </style:style>
    <style:style style:name="P5" style:family="paragraph" style:parent-style-name="Standard" style:list-style-name="L1">
      <style:text-properties officeooo:paragraph-rsid="0013703b"/>
    </style:style>
    <style:style style:name="P6" style:family="paragraph" style:parent-style-name="Standard" style:list-style-name="L1">
      <style:text-properties officeooo:rsid="001b0652" officeooo:paragraph-rsid="0024038d"/>
    </style:style>
    <style:style style:name="P7" style:family="paragraph" style:parent-style-name="Standard">
      <style:text-properties officeooo:paragraph-rsid="0013703b"/>
    </style:style>
    <style:style style:name="P8" style:family="paragraph" style:parent-style-name="Table_20_Contents">
      <style:paragraph-properties fo:text-align="left" style:justify-single-word="false"/>
      <style:text-properties fo:color="#127622" loext:opacity="100%" officeooo:paragraph-rsid="00352104"/>
    </style:style>
    <style:style style:name="P9" style:family="paragraph" style:parent-style-name="Table_20_Contents">
      <style:paragraph-properties fo:text-align="left" style:justify-single-word="false"/>
      <style:text-properties officeooo:paragraph-rsid="00352104"/>
    </style:style>
    <style:style style:name="T1" style:family="text">
      <style:text-properties fo:background-color="#fff5ce" loext:char-shading-value="0"/>
    </style:style>
    <style:style style:name="T2" style:family="text">
      <style:text-properties officeooo:rsid="0021ee32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T5" style:family="text">
      <style:text-properties fo:font-style="italic" fo:background-color="#fff5ce" loext:char-shading-value="0"/>
    </style:style>
    <style:style style:name="T6" style:family="text">
      <style:text-properties officeooo:rsid="0013703b"/>
    </style:style>
    <style:style style:name="T7" style:family="text">
      <style:text-properties officeooo:rsid="001cc294"/>
    </style:style>
    <style:style style:name="T8" style:family="text">
      <style:text-properties officeooo:rsid="00230f4b"/>
    </style:style>
    <style:style style:name="T9" style:family="text">
      <style:text-properties officeooo:rsid="00213d9d"/>
    </style:style>
    <style:style style:name="T10" style:family="text">
      <style:text-properties officeooo:rsid="001e33e2"/>
    </style:style>
    <style:style style:name="T11" style:family="text">
      <style:text-properties officeooo:rsid="0025f9ba"/>
    </style:style>
    <style:style style:name="T12" style:family="text">
      <style:text-properties officeooo:rsid="00138ad9"/>
    </style:style>
    <style:style style:name="T13" style:family="text">
      <style:text-properties officeooo:rsid="00261803"/>
    </style:style>
    <style:style style:name="T14" style:family="text">
      <style:text-properties fo:color="#127622" loext:opacity="100%" officeooo:rsid="00138ad9"/>
    </style:style>
    <style:style style:name="T15" style:family="text">
      <style:text-properties fo:color="#127622" loext:opacity="100%" officeooo:rsid="001458bf"/>
    </style:style>
    <style:style style:name="T16" style:family="text">
      <style:text-properties officeooo:rsid="001679b3"/>
    </style:style>
    <style:style style:name="T17" style:family="text">
      <style:text-properties officeooo:rsid="00179aef"/>
    </style:style>
    <style:style style:name="T18" style:family="text">
      <style:text-properties officeooo:rsid="002813b9"/>
    </style:style>
    <style:style style:name="T19" style:family="text">
      <style:text-properties fo:color="#127622" loext:opacity="100%" officeooo:rsid="00179aef"/>
    </style:style>
    <style:style style:name="T20" style:family="text">
      <style:text-properties fo:color="#127622" loext:opacity="100%" officeooo:rsid="00261803"/>
    </style:style>
    <style:style style:name="T21" style:family="text">
      <style:text-properties fo:color="#127622" loext:opacity="100%" officeooo:rsid="002813b9"/>
    </style:style>
    <style:style style:name="T22" style:family="text">
      <style:text-properties fo:color="#127622" loext:opacity="100%" officeooo:rsid="0029f97d"/>
    </style:style>
    <style:style style:name="T23" style:family="text">
      <style:text-properties fo:color="#127622" loext:opacity="100%" officeooo:rsid="002bc31e"/>
    </style:style>
    <style:style style:name="T24" style:family="text">
      <style:text-properties officeooo:rsid="002e66e9"/>
    </style:style>
    <style:style style:name="T25" style:family="text">
      <style:text-properties fo:color="#127622" loext:opacity="100%" officeooo:rsid="001679b3"/>
    </style:style>
    <style:style style:name="T26" style:family="text">
      <style:text-properties fo:color="#127622" loext:opacity="100%" officeooo:rsid="002e66e9"/>
    </style:style>
    <style:style style:name="T27" style:family="text">
      <style:text-properties officeooo:rsid="002cab3b"/>
    </style:style>
    <style:style style:name="T28" style:family="text">
      <style:text-properties officeooo:rsid="002d23e4"/>
    </style:style>
    <style:style style:name="T29" style:family="text">
      <style:text-properties fo:color="#127622" loext:opacity="100%" officeooo:rsid="002d23e4"/>
    </style:style>
    <style:style style:name="T30" style:family="text">
      <style:text-properties fo:color="#127622" loext:opacity="100%"/>
    </style:style>
    <style:style style:name="T31" style:family="text">
      <style:text-properties officeooo:rsid="003164e4"/>
    </style:style>
    <style:style style:name="T32" style:family="text">
      <style:text-properties officeooo:rsid="00342d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Jeremiah 31:15</text:p>
            <text:p text:style-name="P2">Thus saith the LORD; A voice was heard <text:span text:style-name="T1">in Ramah</text:span>, lamentation, and bitter weeping; <text:span text:style-name="T1">Rahel</text:span> weeping for her children refused to be comforted for her children, because they were not.</text:p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Matthew 2:1-<text:span text:style-name="T2">8,16-18</text:span><text:line-break/><text:span text:style-name="T3">1</text:span> Now when Jesus was born in <text:span text:style-name="T1">Bethlehem of Judaea</text:span> in the days of Herod the king, behold, there came wise men from the east to Jerusalem, <text:line-break/><text:span text:style-name="T3">2</text:span> Saying, Where is he that is born King of the Jews? for we have seen his star in the east, and are come to worship him. <text:line-break/><text:span text:style-name="T3">3</text:span> When Herod the king had heard <text:span text:style-name="T4">these things</text:span>, he was troubled, and all Jerusalem with him. <text:line-break/><text:span text:style-name="T3">4</text:span> And when he had gathered all the chief priests and scribes of the people together, he demanded of them where Christ should be born. <text:line-break/><text:span text:style-name="T3">5</text:span> And they said unto him, In <text:span text:style-name="T1">Bethlehem of Judaea</text:span>: for thus it is written by the prophet, <text:line-break/><text:span text:style-name="T3">6</text:span> And thou <text:span text:style-name="T1">Bethlehem, </text:span><text:span text:style-name="T5">in</text:span><text:span text:style-name="T1"> the land of Juda</text:span>, art not the least among the princes of Juda: for out of thee shall come a Governor, that shall rule my people Israel. <text:line-break/><text:span text:style-name="T3">7</text:span> Then Herod, when he had privily called the wise men, inquired of them diligently what time the star appeared. <text:line-break/><text:span text:style-name="T3">8</text:span> And he sent them to <text:span text:style-name="T1">Bethlehem</text:span>, and said, Go and search diligently for the young child; and when ye have found <text:span text:style-name="T4">him</text:span>, bring me word again, that I may come and worship him also. <text:line-break/>...<text:line-break/><text:span text:style-name="T3">16</text:span> Then Herod, when he saw that he was mocked of the wise men, was exceeding wroth, and sent forth, and slew all the children that were <text:span text:style-name="T1">in Bethlehem</text:span>, and <text:span text:style-name="T1">in all the coasts thereof</text:span>, from two years old and under, according to the time which he had diligently enquired of the wise men. <text:line-break/><text:span text:style-name="T3">17</text:span> Then was fulfilled that which was spoken by <text:span text:style-name="T1">Jeremy</text:span> the prophet, saying, <text:line-break/><text:span text:style-name="T3">18</text:span> In <text:span text:style-name="T1">Rama</text:span> was there a voice heard, lamentation, and weeping, and great mourning, <text:span text:style-name="T1">Rachel</text:span> weeping <text:span text:style-name="T4">for</text:span> her children, and would not be comforted, because they are not.</text:p>
          </table:table-cell>
        </table:table-row>
      </table:table>
      <text:list text:style-name="L1">
        <text:list-item>
          <text:p text:style-name="P5">The following<text:span text:style-name="T6"> </text:span>points are obvious from comparing the two verses</text:p>
          <text:list>
            <text:list-item>
              <text:p text:style-name="P5">Ramah &amp; Rama are two names for the same location.</text:p>
            </text:list-item>
            <text:list-item>
              <text:p text:style-name="P5">Rahel &amp; Rachel are two names for the same woman.</text:p>
            </text:list-item>
            <text:list-item>
              <text:p text:style-name="P6">It’s<text:span text:style-name="T7"> </text:span>not talking about the Ramah in Napthtali <text:span text:style-name="T8">next to Asher </text:span><text:span text:style-name="T2">(Jos 19:24,29,32,36)</text:span> <text:span text:style-name="T8">or</text:span><text:span text:style-name="T7"> the Bethlehem in Zebulun (Jos 19:10,15)</text:span></text:p>
              <text:list>
                <text:list-item>
                  <text:p text:style-name="P6"><text:span text:style-name="T9">Micah 5:2, </text:span><text:span text:style-name="T10">Luke 2:4, John 7:42</text:span></text:p>
                </text:list-item>
              </text:list>
            </text:list-item>
          </text:list>
        </text:list-item>
      </text:list>
      <text:p text:style-name="P7"/>
      <text:p text:style-name="Standard"><text:span text:style-name="T11">A</text:span><text:span text:style-name="T12"> city </text:span><text:span text:style-name="T11">called</text:span><text:span text:style-name="T12"> Ramah was given </text:span><text:span text:style-name="T13">to </text:span><text:span text:style-name="T12">the tribe of Benjamin (</text:span><text:span text:style-name="T14">Jos 18:21-25</text:span><text:span text:style-name="T12">) who’s mother is Rachel the wife of Jacob/Israel (</text:span><text:span text:style-name="T14">Gen 30:23, 35:18, 1Ch 2:</text:span><text:span text:style-name="T15">1,</text:span><text:span text:style-name="T14">2</text:span><text:span text:style-name="T12">).</text:span></text:p>
      <text:p text:style-name="Standard"/>
      <text:p text:style-name="Standard"><text:span text:style-name="T16">But, what about Bethlehem/</text:span><text:span text:style-name="T17">Ephrath/</text:span><text:span text:style-name="T18">Ephratah/</text:span><text:span text:style-name="T13">Beth-lehem-judah</text:span><text:span text:style-name="T17"> (</text:span><text:span text:style-name="T19">Gen 35:19, 48:7, </text:span><text:span text:style-name="T20">Jdg 17:7,8,9, </text:span><text:span text:style-name="T21">19:1,2,18,</text:span><text:span text:style-name="T22"> </text:span><text:span text:style-name="T21">Rth 1:1,2,19,22, 2:4, 4:11,</text:span><text:span text:style-name="T23"> Mic 5:2</text:span><text:span text:style-name="T17">)</text:span><text:span text:style-name="T16">? The territory </text:span><text:span text:style-name="T24">just </text:span><text:span text:style-name="T16">south of Jebus/Jerusalem (</text:span><text:span text:style-name="T25">Jdg 19:10, </text:span><text:span text:style-name="T26">Jos 15:8</text:span><text:span text:style-name="T16">) was given to Judah </text:span><text:span text:style-name="T24">and</text:span><text:span text:style-name="T27"> </text:span><text:span text:style-name="T28">although </text:span><text:span text:style-name="T24">Bethlehem</text:span><text:span text:style-name="T28"> doesn’t appear to be mentioned specifically in </text:span><text:span text:style-name="T29">Jos 15</text:span> it <text:span text:style-name="T24">still fell </text:span>within the borders of Judah (<text:span text:style-name="T30">Jos 15:1-63</text:span>).</text:p>
      <text:p text:style-name="Standard"/>
      <text:p text:style-name="Standard">Judah <text:span text:style-name="T31">is </text:span><text:span text:style-name="T32">a</text:span><text:span text:style-name="T31"> son of Leah </text:span><text:span text:style-name="T32">the </text:span><text:span text:style-name="T31">wife of Jacob/Israel (Gen 29:32,35) </text:span><text:span text:style-name="T32">and not a son of Rachel (Joseph, Benjamin).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30">Genesis 35:16-19</text:span><text:line-break/><text:span text:style-name="T3">16</text:span> And they journeyed from Beth-el; and there was but a little way to come to <text:span text:style-name="T1">Ephrath</text:span>: and Rachel travailed, and she had hard labour. <text:line-break/><text:span text:style-name="T3">17</text:span> And it came to pass, when she was in hard labour, that the midwife said unto her, Fear not; thou shalt have this son also. <text:line-break/><text:span text:style-name="T3">18</text:span> And it came to pass, as her soul was in departing, (for she died) that she called his name Ben-oni: but his father called him Benjamin. <text:line-break/><text:span text:style-name="T3">19</text:span> And <text:span text:style-name="T1">Rachel</text:span> died, and was buried in the way to <text:span text:style-name="T1">Ephrath, which </text:span><text:span text:style-name="T5">is</text:span><text:span text:style-name="T1"> Beth-lehem</text:span>.</text:p>
          </table:table-cell>
        </table:table-row>
        <table:table-row>
          <table:table-cell table:style-name="Table3.A2" office:value-type="string">
            <text:p text:style-name="P8">Genesis 48:7</text:p>
            <text:p text:style-name="P9">And as for me, when I came from Padan, <text:span text:style-name="T1">Rachel</text:span> died by me in the land of Canaan in the way, when yet there was but a little way to come unto <text:span text:style-name="T1">Ephrath</text:span>: and I buried her there in the way of <text:span text:style-name="T1">Ephrath; the same is</text:span> <text:span text:style-name="T1">Beth-lehem</text:span>.</text:p>
          </table:table-cell>
        </table:table-row>
      </table:table>
      <text:p text:style-name="Standard"/>
      <text:p text:style-name="Standard"/>
      <text:p text:style-name="Standard"><draw:frame draw:style-name="fr1" draw:name="Image1" text:anchor-type="char" svg:x="3.4602in" svg:y="-0.0252in" svg:width="4.3791in" svg:height="4.4807in" draw:z-index="0"><draw:image xlink:href="Pictures/100000010000028700000296F7EADFA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paragraph-properties fo:line-height="100%" style:register-true="false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padding="0.0098in" fo:border="none" style:shadow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1:53:29.343331500</meta:creation-date>
    <dc:date>2026-07-11T12:31:00.594620163</dc:date>
    <meta:editing-duration>PT1H40M33S</meta:editing-duration>
    <meta:editing-cycles>42</meta:editing-cycles>
    <meta:generator>LibreOffice/26.2.4.2$Linux_X86_64 LibreOffice_project/64a984c51f4702dbd3710b13428c673a2f1292e7</meta:generator>
    <dc:title>Jeremiah 31:15 - Matthew 2:16-18</dc:title>
    <meta:document-statistic meta:table-count="3" meta:image-count="1" meta:object-count="0" meta:page-count="2" meta:paragraph-count="14" meta:word-count="634" meta:character-count="3424" meta:non-whitespace-character-count="2796"/>
  </office:meta>
</office:document-meta>
</file>