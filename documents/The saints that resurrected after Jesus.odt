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29B20DA4B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lackChancery" svg:font-family="BlackChancery"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DejaVu Sans" svg:font-family="'DejaVu Sans'" style:font-family-generic="system" style:font-pitch="variable"/>
    <style:font-face style:name="Gabriela Nerd Font" svg:font-family="'Gabriela Nerd Fon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NotoSans NF" svg:font-family="'NotoSans NF'" style:font-family-generic="system" style:font-pitch="variable"/>
    <style:font-face style:name="OpenSymbol" svg:font-family="OpenSymbol" style:font-charset="x-symbol"/>
  </office:font-face-decls>
  <office:automatic-styles>
    <style:style style:name="Table4" style:family="table">
      <style:table-properties style:width="8.1194in" table:align="margins" style:shadow="#808080 0.0403in 0.0403in" style:writing-mode="lr-tb"/>
    </style:style>
    <style:style style:name="Table4.A" style:family="table-column">
      <style:table-column-properties style:column-width="8.1194in" style:rel-column-width="65535*"/>
    </style:style>
    <style:style style:name="Table4.A1" style:family="table-cell">
      <style:table-cell-properties fo:padding="0.0382in" fo:border="0.75pt solid #000000"/>
    </style:style>
    <style:style style:name="Table27" style:family="table">
      <style:table-properties style:width="8.1194in" table:align="margins" style:shadow="#808080 0.0403in 0.0403in" style:writing-mode="lr-tb"/>
    </style:style>
    <style:style style:name="Table27.A" style:family="table-column">
      <style:table-column-properties style:column-width="8.1194in" style:rel-column-width="65535*"/>
    </style:style>
    <style:style style:name="Table27.A1" style:family="table-cell">
      <style:table-cell-properties fo:padding="0.0382in" fo:border="0.45pt solid #000000"/>
    </style:style>
    <style:style style:name="Table27.A2" style:family="table-cell">
      <style:table-cell-properties fo:padding="0.0382in" fo:border-left="0.45pt solid #000000" fo:border-right="0.45pt solid #000000" fo:border-top="none" fo:border-bottom="0.45pt solid #000000"/>
    </style:style>
    <style:style style:name="Table23" style:family="table">
      <style:table-properties style:width="8.1194in" table:align="margins" style:shadow="#808080 0.0403in 0.0403in" style:writing-mode="lr-tb"/>
    </style:style>
    <style:style style:name="Table23.A" style:family="table-column">
      <style:table-column-properties style:column-width="6.1972in" style:rel-column-width="50021*"/>
    </style:style>
    <style:style style:name="Table23.B" style:family="table-column">
      <style:table-column-properties style:column-width="1.9222in" style:rel-column-width="15514*"/>
    </style:style>
    <style:style style:name="Table23.A1" style:family="table-cell">
      <style:table-cell-properties fo:padding="0.0382in" fo:border-left="0.75pt solid #000000" fo:border-right="none" fo:border-top="0.75pt solid #000000" fo:border-bottom="0.75pt solid #000000"/>
    </style:style>
    <style:style style:name="Table23.B1" style:family="table-cell">
      <style:table-cell-properties style:vertical-align="middle" fo:padding="0.0382in" fo:border="0.75pt solid #000000"/>
    </style:style>
    <style:style style:name="Table23.A2" style:family="table-cell">
      <style:table-cell-properties fo:padding="0.0382in" fo:border-left="0.75pt solid #000000" fo:border-right="none" fo:border-top="none" fo:border-bottom="0.75pt solid #000000"/>
    </style:style>
    <style:style style:name="Table23.B2" style:family="table-cell">
      <style:table-cell-properties style:vertical-align="middle" fo:padding="0.0382in" fo:border-left="0.75pt solid #000000" fo:border-right="0.75pt solid #000000" fo:border-top="none" fo:border-bottom="0.75pt solid #000000"/>
    </style:style>
    <style:style style:name="Table23.A3" style:family="table-cell">
      <style:table-cell-properties fo:padding="0.0382in" fo:border-left="0.75pt solid #000000" fo:border-right="none" fo:border-top="none" fo:border-bottom="0.75pt solid #000000"/>
    </style:style>
    <style:style style:name="Table23.A4" style:family="table-cell">
      <style:table-cell-properties fo:padding="0.0382in" fo:border-left="0.75pt solid #000000" fo:border-right="none" fo:border-top="none" fo:border-bottom="0.75pt solid #000000"/>
    </style:style>
    <style:style style:name="Table23.5" style:family="table-row">
      <style:table-row-properties style:min-row-height="0.6875in"/>
    </style:style>
    <style:style style:name="Table23.A5" style:family="table-cell">
      <style:table-cell-properties fo:padding="0.0382in" fo:border-left="0.75pt solid #000000" fo:border-right="none" fo:border-top="none" fo:border-bottom="0.75pt solid #000000"/>
    </style:style>
    <style:style style:name="Table23.A6" style:family="table-cell">
      <style:table-cell-properties fo:padding="0.0382in" fo:border-left="0.75pt solid #000000" fo:border-right="none" fo:border-top="none" fo:border-bottom="0.75pt solid #000000"/>
    </style:style>
    <style:style style:name="Table1" style:family="table">
      <style:table-properties style:width="8.1194in" table:align="margins" style:shadow="#808080 0.0403in 0.0403in" style:writing-mode="lr-tb"/>
    </style:style>
    <style:style style:name="Table1.A" style:family="table-column">
      <style:table-column-properties style:column-width="8.1194in" style:rel-column-width="65535*"/>
    </style:style>
    <style:style style:name="Table1.1" style:family="table-row">
      <style:table-row-properties style:min-row-height="0.25in"/>
    </style:style>
    <style:style style:name="Table1.A1" style:family="table-cell">
      <style:table-cell-properties fo:padding="0.0382in" fo:border="0.75pt solid #000000"/>
    </style:style>
    <style:style style:name="Table10" style:family="table">
      <style:table-properties style:width="8.1194in" fo:break-before="page" table:align="margins" style:shadow="#808080 0.0403in 0.0403in" fo:keep-with-next="always" style:writing-mode="lr-tb" table:border-model="separating"/>
    </style:style>
    <style:style style:name="Table10.A" style:family="table-column">
      <style:table-column-properties style:column-width="5.5104in" style:rel-column-width="44476*"/>
    </style:style>
    <style:style style:name="Table10.B" style:family="table-column">
      <style:table-column-properties style:column-width="2.609in" style:rel-column-width="21059*"/>
    </style:style>
    <style:style style:name="Table10.A1" style:family="table-cell">
      <style:table-cell-properties style:vertical-align="middle" fo:padding="0.0201in" fo:border-left="0.75pt solid #000000" fo:border-right="none" fo:border-top="0.75pt solid #000000" fo:border-bottom="0.75pt solid #000000"/>
    </style:style>
    <style:style style:name="Table10.B1" style:family="table-cell">
      <style:table-cell-properties style:vertical-align="middle" fo:padding="0.0201in" fo:border="0.75pt solid #000000"/>
    </style:style>
    <style:style style:name="Table10.A2" style:family="table-cell">
      <style:table-cell-properties style:vertical-align="middle" fo:padding="0.0201in" fo:border-left="0.75pt solid #000000" fo:border-right="none" fo:border-top="none" fo:border-bottom="0.75pt solid #000000"/>
    </style:style>
    <style:style style:name="Table10.B2" style:family="table-cell">
      <style:table-cell-properties style:vertical-align="middle" fo:padding="0.0201in" fo:border-left="0.75pt solid #000000" fo:border-right="0.75pt solid #000000" fo:border-top="none" fo:border-bottom="0.75pt solid #000000"/>
    </style:style>
    <style:style style:name="Table10.3" style:family="table-row">
      <style:table-row-properties style:min-row-height="1.0333in"/>
    </style:style>
    <style:style style:name="Table10.4" style:family="table-row">
      <style:table-row-properties style:min-row-height="1.9167in"/>
    </style:style>
    <style:style style:name="Table16" style:family="table">
      <style:table-properties style:width="8.1194in" table:align="margins" style:shadow="#808080 0.0403in 0.0403in" style:writing-mode="lr-tb"/>
    </style:style>
    <style:style style:name="Table16.A" style:family="table-column">
      <style:table-column-properties style:column-width="8.1194in" style:rel-column-width="65535*"/>
    </style:style>
    <style:style style:name="Table16.A1" style:family="table-cell">
      <style:table-cell-properties fo:padding="0.0382in" fo:border="0.75pt solid #000000"/>
    </style:style>
    <style:style style:name="Table14" style:family="table">
      <style:table-properties style:width="8.1194in" table:align="margins" style:shadow="#808080 0.0403in 0.0403in" style:writing-mode="lr-tb"/>
    </style:style>
    <style:style style:name="Table14.A" style:family="table-column">
      <style:table-column-properties style:column-width="8.1194in" style:rel-column-width="65535*"/>
    </style:style>
    <style:style style:name="Table14.A1" style:family="table-cell">
      <style:table-cell-properties fo:padding="0.0382in" fo:border="0.75pt solid #000000"/>
    </style:style>
    <style:style style:name="Table14.A2" style:family="table-cell">
      <style:table-cell-properties fo:padding="0.0382in" fo:border-left="0.75pt solid #000000" fo:border-right="0.75pt solid #000000" fo:border-top="none" fo:border-bottom="0.75pt solid #000000"/>
    </style:style>
    <style:style style:name="Table2" style:family="table">
      <style:table-properties style:width="8.1194in" table:align="margins" style:shadow="#808080 0.0403in 0.0403in" style:writing-mode="lr-tb"/>
    </style:style>
    <style:style style:name="Table2.A" style:family="table-column">
      <style:table-column-properties style:column-width="8.1194in" style:rel-column-width="65535*"/>
    </style:style>
    <style:style style:name="Table2.A1" style:family="table-cell">
      <style:table-cell-properties fo:padding="0.0382in" fo:border="0.75pt solid #000000"/>
    </style:style>
    <style:style style:name="Table39" style:family="table">
      <style:table-properties style:width="8.1194in" table:align="margins" style:shadow="#808080 0.0403in 0.0403in" style:writing-mode="lr-tb"/>
    </style:style>
    <style:style style:name="Table39.A" style:family="table-column">
      <style:table-column-properties style:column-width="8.1194in" style:rel-column-width="65535*"/>
    </style:style>
    <style:style style:name="Table39.A1" style:family="table-cell">
      <style:table-cell-properties fo:padding="0.0382in" fo:border="0.75pt solid #000000"/>
    </style:style>
    <style:style style:name="Table39.A2" style:family="table-cell">
      <style:table-cell-properties fo:padding="0.0382in" fo:border-left="0.75pt solid #000000" fo:border-right="0.75pt solid #000000" fo:border-top="none" fo:border-bottom="0.75pt solid #000000"/>
    </style:style>
    <style:style style:name="Table39.3" style:family="table-row">
      <style:table-row-properties style:min-row-height="0.2563in"/>
    </style:style>
    <style:style style:name="Table3" style:family="table">
      <style:table-properties style:width="8.1194in" table:align="margins" style:shadow="#808080 0.0403in 0.0403in" style:writing-mode="lr-tb"/>
    </style:style>
    <style:style style:name="Table3.A" style:family="table-column">
      <style:table-column-properties style:column-width="8.1194in" style:rel-column-width="65535*"/>
    </style:style>
    <style:style style:name="Table3.A1" style:family="table-cell">
      <style:table-cell-properties fo:padding="0.0382in" fo:border="0.75pt solid #000000"/>
    </style:style>
    <style:style style:name="Table15" style:family="table">
      <style:table-properties style:width="8.1194in" table:align="margins" style:shadow="#808080 0.0403in 0.0403in" style:writing-mode="lr-tb"/>
    </style:style>
    <style:style style:name="Table15.A" style:family="table-column">
      <style:table-column-properties style:column-width="8.1194in" style:rel-column-width="65535*"/>
    </style:style>
    <style:style style:name="Table15.A1" style:family="table-cell">
      <style:table-cell-properties fo:padding="0.0382in" fo:border="0.75pt solid #000000"/>
    </style:style>
    <style:style style:name="Table41" style:family="table">
      <style:table-properties style:width="8.1194in" table:align="margins" style:shadow="#808080 0.0403in 0.0403in" style:writing-mode="lr-tb"/>
    </style:style>
    <style:style style:name="Table41.A" style:family="table-column">
      <style:table-column-properties style:column-width="8.1194in" style:rel-column-width="65535*"/>
    </style:style>
    <style:style style:name="Table41.A1" style:family="table-cell">
      <style:table-cell-properties fo:padding="0.0382in" fo:border="0.75pt solid #000000"/>
    </style:style>
    <style:style style:name="Table41.A2" style:family="table-cell">
      <style:table-cell-properties fo:padding="0.0382in" fo:border-left="0.75pt solid #000000" fo:border-right="0.75pt solid #000000" fo:border-top="none" fo:border-bottom="0.75pt solid #000000"/>
    </style:style>
    <style:style style:name="Table17" style:family="table">
      <style:table-properties style:width="8.1194in" table:align="margins" style:shadow="#808080 0.0403in 0.0403in" style:writing-mode="lr-tb"/>
    </style:style>
    <style:style style:name="Table17.A" style:family="table-column">
      <style:table-column-properties style:column-width="8.1194in" style:rel-column-width="65535*"/>
    </style:style>
    <style:style style:name="Table17.A1" style:family="table-cell">
      <style:table-cell-properties fo:padding="0.0382in" fo:border="0.75pt solid #000000"/>
    </style:style>
    <style:style style:name="Table33" style:family="table">
      <style:table-properties style:width="8.1194in" table:align="margins" style:shadow="#808080 0.0403in 0.0403in" style:writing-mode="lr-tb"/>
    </style:style>
    <style:style style:name="Table33.A" style:family="table-column">
      <style:table-column-properties style:column-width="8.1194in" style:rel-column-width="65535*"/>
    </style:style>
    <style:style style:name="Table33.A1" style:family="table-cell">
      <style:table-cell-properties fo:padding="0.0382in" fo:border="0.75pt solid #000000"/>
    </style:style>
    <style:style style:name="Table34" style:family="table">
      <style:table-properties style:width="8.1194in" table:align="margins" style:shadow="#808080 0.0403in 0.0403in" style:writing-mode="lr-tb"/>
    </style:style>
    <style:style style:name="Table34.A" style:family="table-column">
      <style:table-column-properties style:column-width="8.1194in" style:rel-column-width="65535*"/>
    </style:style>
    <style:style style:name="Table34.A1" style:family="table-cell">
      <style:table-cell-properties fo:padding="0.0382in" fo:border="0.75pt solid #000000"/>
    </style:style>
    <style:style style:name="Table22" style:family="table">
      <style:table-properties style:width="8.1194in" table:align="margins" style:shadow="#808080 0.0403in 0.0403in" style:writing-mode="lr-tb"/>
    </style:style>
    <style:style style:name="Table22.A" style:family="table-column">
      <style:table-column-properties style:column-width="8.1194in" style:rel-column-width="65535*"/>
    </style:style>
    <style:style style:name="Table22.A1" style:family="table-cell">
      <style:table-cell-properties fo:padding="0.0382in" fo:border="0.75pt solid #000000"/>
    </style:style>
    <style:style style:name="Table22.A2" style:family="table-cell">
      <style:table-cell-properties fo:padding="0.0382in" fo:border-left="0.75pt solid #000000" fo:border-right="0.75pt solid #000000" fo:border-top="none" fo:border-bottom="0.75pt solid #000000"/>
    </style:style>
    <style:style style:name="Table11" style:family="table">
      <style:table-properties style:width="8.1194in" table:align="margins" style:shadow="#808080 0.0403in 0.0403in" style:writing-mode="lr-tb"/>
    </style:style>
    <style:style style:name="Table11.A" style:family="table-column">
      <style:table-column-properties style:column-width="8.1194in" style:rel-column-width="65535*"/>
    </style:style>
    <style:style style:name="Table11.A1" style:family="table-cell">
      <style:table-cell-properties fo:padding="0.0382in" fo:border="0.75pt solid #000000"/>
    </style:style>
    <style:style style:name="Table11.A2" style:family="table-cell">
      <style:table-cell-properties fo:padding="0.0382in" fo:border-left="0.75pt solid #000000" fo:border-right="0.75pt solid #000000" fo:border-top="none" fo:border-bottom="0.75pt solid #000000"/>
    </style:style>
    <style:style style:name="Table32" style:family="table">
      <style:table-properties style:width="8.1194in" table:align="margins" style:shadow="#808080 0.0403in 0.0403in" style:writing-mode="lr-tb"/>
    </style:style>
    <style:style style:name="Table32.A" style:family="table-column">
      <style:table-column-properties style:column-width="8.1194in" style:rel-column-width="65535*"/>
    </style:style>
    <style:style style:name="Table32.A1" style:family="table-cell">
      <style:table-cell-properties fo:padding="0.0382in" fo:border="0.75pt solid #000000"/>
    </style:style>
    <style:style style:name="Table32.A2" style:family="table-cell">
      <style:table-cell-properties fo:padding="0.0382in" fo:border-left="0.75pt solid #000000" fo:border-right="0.75pt solid #000000" fo:border-top="none" fo:border-bottom="0.75pt solid #000000"/>
    </style:style>
    <style:style style:name="Table36" style:family="table">
      <style:table-properties style:width="8.1194in" table:align="margins" style:shadow="#808080 0.0403in 0.0403in" style:writing-mode="lr-tb"/>
    </style:style>
    <style:style style:name="Table36.A" style:family="table-column">
      <style:table-column-properties style:column-width="8.1194in" style:rel-column-width="65535*"/>
    </style:style>
    <style:style style:name="Table36.A1" style:family="table-cell">
      <style:table-cell-properties fo:padding="0.0382in" fo:border="0.75pt solid #000000"/>
    </style:style>
    <style:style style:name="Table36.A2" style:family="table-cell">
      <style:table-cell-properties fo:padding="0.0382in" fo:border-left="0.75pt solid #000000" fo:border-right="0.75pt solid #000000" fo:border-top="none" fo:border-bottom="0.75pt solid #000000"/>
    </style:style>
    <style:style style:name="Table25" style:family="table">
      <style:table-properties style:width="8.1597in" table:align="margins" style:writing-mode="lr-tb"/>
    </style:style>
    <style:style style:name="Table25.A" style:family="table-column">
      <style:table-column-properties style:column-width="8.1597in" style:rel-column-width="65535*"/>
    </style:style>
    <style:style style:name="Table25.A1" style:family="table-cell">
      <style:table-cell-properties fo:padding="0.0382in" fo:border="0.5pt solid #000000"/>
    </style:style>
    <style:style style:name="Table25.A2" style:family="table-cell">
      <style:table-cell-properties fo:padding="0.0382in" fo:border-left="0.5pt solid #000000" fo:border-right="0.5pt solid #000000" fo:border-top="none" fo:border-bottom="0.5pt solid #000000"/>
    </style:style>
    <style:style style:name="Table12" style:family="table">
      <style:table-properties style:width="8.1194in" table:align="margins" style:shadow="#808080 0.0403in 0.0403in" style:writing-mode="lr-tb"/>
    </style:style>
    <style:style style:name="Table12.A" style:family="table-column">
      <style:table-column-properties style:column-width="4.1618in" style:rel-column-width="33592*"/>
    </style:style>
    <style:style style:name="Table12.B" style:family="table-column">
      <style:table-column-properties style:column-width="1.6528in" style:rel-column-width="13340*"/>
    </style:style>
    <style:style style:name="Table12.C" style:family="table-column">
      <style:table-column-properties style:column-width="2.3049in" style:rel-column-width="18603*"/>
    </style:style>
    <style:style style:name="Table12.A1" style:family="table-cell">
      <style:table-cell-properties fo:padding="0.0382in" fo:border-left="0.75pt solid #000000" fo:border-right="none" fo:border-top="0.75pt solid #000000" fo:border-bottom="0.75pt solid #000000"/>
    </style:style>
    <style:style style:name="Table12.C1" style:family="table-cell">
      <style:table-cell-properties fo:padding="0.0382in" fo:border="0.75pt solid #000000"/>
    </style:style>
    <style:style style:name="Table12.A2" style:family="table-cell">
      <style:table-cell-properties fo:padding="0.0382in" fo:border-left="0.75pt solid #000000" fo:border-right="none" fo:border-top="none" fo:border-bottom="0.75pt solid #000000"/>
    </style:style>
    <style:style style:name="Table12.C2" style:family="table-cell">
      <style:table-cell-properties fo:padding="0.0382in" fo:border-left="0.75pt solid #000000" fo:border-right="0.75pt solid #000000" fo:border-top="none" fo:border-bottom="0.75pt solid #000000"/>
    </style:style>
    <style:style style:name="Table38" style:family="table">
      <style:table-properties style:width="8.1194in" table:align="margins" style:shadow="#808080 0.0403in 0.0403in" style:writing-mode="lr-tb"/>
    </style:style>
    <style:style style:name="Table38.A" style:family="table-column">
      <style:table-column-properties style:column-width="8.1194in" style:rel-column-width="65535*"/>
    </style:style>
    <style:style style:name="Table38.A1" style:family="table-cell">
      <style:table-cell-properties fo:padding="0.0382in" fo:border="0.75pt solid #000000"/>
    </style:style>
    <style:style style:name="Table35" style:family="table">
      <style:table-properties style:width="8.1194in" table:align="margins" style:shadow="#808080 0.0403in 0.0403in" style:writing-mode="lr-tb"/>
    </style:style>
    <style:style style:name="Table35.A" style:family="table-column">
      <style:table-column-properties style:column-width="8.1194in" style:rel-column-width="65535*"/>
    </style:style>
    <style:style style:name="Table35.A1" style:family="table-cell">
      <style:table-cell-properties fo:padding="0.0382in" fo:border="0.75pt solid #000000"/>
    </style:style>
    <style:style style:name="Table31" style:family="table">
      <style:table-properties style:width="8.1194in" table:align="margins" style:shadow="#808080 0.0403in 0.0403in" style:writing-mode="lr-tb"/>
    </style:style>
    <style:style style:name="Table31.A" style:family="table-column">
      <style:table-column-properties style:column-width="8.1194in" style:rel-column-width="65535*"/>
    </style:style>
    <style:style style:name="Table31.A1" style:family="table-cell">
      <style:table-cell-properties fo:padding="0.0382in" fo:border="0.75pt solid #000000"/>
    </style:style>
    <style:style style:name="Table31.A2" style:family="table-cell">
      <style:table-cell-properties fo:padding="0.0382in" fo:border-left="0.75pt solid #000000" fo:border-right="0.75pt solid #000000" fo:border-top="none" fo:border-bottom="0.75pt solid #000000"/>
    </style:style>
    <style:style style:name="Table21" style:family="table">
      <style:table-properties style:width="8.1194in" table:align="margins" style:shadow="#808080 0.0403in 0.0403in" style:writing-mode="lr-tb"/>
    </style:style>
    <style:style style:name="Table21.A" style:family="table-column">
      <style:table-column-properties style:column-width="8.1194in" style:rel-column-width="65535*"/>
    </style:style>
    <style:style style:name="Table21.A1" style:family="table-cell">
      <style:table-cell-properties fo:padding="0.0382in" fo:border="0.75pt solid #000000"/>
    </style:style>
    <style:style style:name="Table21.A2" style:family="table-cell">
      <style:table-cell-properties fo:padding="0.0382in" fo:border-left="0.75pt solid #000000" fo:border-right="0.75pt solid #000000" fo:border-top="none" fo:border-bottom="0.75pt solid #000000"/>
    </style:style>
    <style:style style:name="Table37" style:family="table">
      <style:table-properties style:width="8.1194in" table:align="margins" style:shadow="#808080 0.0403in 0.0403in" style:writing-mode="lr-tb"/>
    </style:style>
    <style:style style:name="Table37.A" style:family="table-column">
      <style:table-column-properties style:column-width="8.1194in" style:rel-column-width="65535*"/>
    </style:style>
    <style:style style:name="Table37.A1" style:family="table-cell">
      <style:table-cell-properties fo:padding="0.0382in" fo:border="0.75pt solid #000000"/>
    </style:style>
    <style:style style:name="Table6" style:family="table">
      <style:table-properties style:width="8.1194in" table:align="margins" style:shadow="#808080 0.0403in 0.0403in" style:writing-mode="lr-tb"/>
    </style:style>
    <style:style style:name="Table6.A" style:family="table-column">
      <style:table-column-properties style:column-width="8.1194in" style:rel-column-width="65535*"/>
    </style:style>
    <style:style style:name="Table6.A1" style:family="table-cell">
      <style:table-cell-properties fo:padding="0.0382in" fo:border="0.75pt solid #000000"/>
    </style:style>
    <style:style style:name="Table7" style:family="table">
      <style:table-properties style:width="8.1194in" table:align="margins" style:shadow="#808080 0.0403in 0.0403in" style:writing-mode="lr-tb"/>
    </style:style>
    <style:style style:name="Table7.A" style:family="table-column">
      <style:table-column-properties style:column-width="8.1194in" style:rel-column-width="65535*"/>
    </style:style>
    <style:style style:name="Table7.A1" style:family="table-cell">
      <style:table-cell-properties fo:padding="0.0382in" fo:border="0.75pt solid #000000"/>
    </style:style>
    <style:style style:name="Table8" style:family="table">
      <style:table-properties style:width="8.1194in" table:align="margins" style:shadow="#808080 0.0403in 0.0403in" style:writing-mode="lr-tb"/>
    </style:style>
    <style:style style:name="Table8.A" style:family="table-column">
      <style:table-column-properties style:column-width="8.1194in" style:rel-column-width="65535*"/>
    </style:style>
    <style:style style:name="Table8.A1" style:family="table-cell">
      <style:table-cell-properties fo:padding="0.0382in" fo:border="0.75pt solid #000000"/>
    </style:style>
    <style:style style:name="Table9" style:family="table">
      <style:table-properties style:width="8.1194in" table:align="margins" style:shadow="#808080 0.0403in 0.0403in" style:writing-mode="lr-tb"/>
    </style:style>
    <style:style style:name="Table9.A" style:family="table-column">
      <style:table-column-properties style:column-width="8.1194in" style:rel-column-width="65535*"/>
    </style:style>
    <style:style style:name="Table9.A1" style:family="table-cell">
      <style:table-cell-properties fo:padding="0.0382in" fo:border="0.75pt solid #000000"/>
    </style:style>
    <style:style style:name="Table13" style:family="table">
      <style:table-properties style:width="8.1194in" table:align="margins" style:shadow="#808080 0.0403in 0.0403in" style:writing-mode="lr-tb"/>
    </style:style>
    <style:style style:name="Table13.A" style:family="table-column">
      <style:table-column-properties style:column-width="8.1194in" style:rel-column-width="65535*"/>
    </style:style>
    <style:style style:name="Table13.A1" style:family="table-cell">
      <style:table-cell-properties fo:padding="0.0382in" fo:border="0.75pt solid #000000"/>
    </style:style>
    <style:style style:name="Table24" style:family="table">
      <style:table-properties style:width="8.1194in" table:align="margins" style:shadow="#808080 0.0403in 0.0403in" style:writing-mode="lr-tb"/>
    </style:style>
    <style:style style:name="Table24.A" style:family="table-column">
      <style:table-column-properties style:column-width="8.1194in" style:rel-column-width="65535*"/>
    </style:style>
    <style:style style:name="Table24.A1" style:family="table-cell">
      <style:table-cell-properties fo:padding="0.0382in" fo:border="0.75pt solid #000000"/>
    </style:style>
    <style:style style:name="Table29" style:family="table">
      <style:table-properties style:width="8.1194in" table:align="margins" style:shadow="#808080 0.0403in 0.0403in" style:writing-mode="lr-tb"/>
    </style:style>
    <style:style style:name="Table29.A" style:family="table-column">
      <style:table-column-properties style:column-width="8.1194in" style:rel-column-width="65535*"/>
    </style:style>
    <style:style style:name="Table29.A1" style:family="table-cell">
      <style:table-cell-properties fo:padding="0.0382in" fo:border="0.75pt solid #000000"/>
    </style:style>
    <style:style style:name="Table29.A2" style:family="table-cell">
      <style:table-cell-properties fo:padding="0.0382in" fo:border-left="0.75pt solid #000000" fo:border-right="0.75pt solid #000000" fo:border-top="none" fo:border-bottom="0.75pt solid #000000"/>
    </style:style>
    <style:style style:name="Table28" style:family="table">
      <style:table-properties style:width="8.1194in" table:align="margins" style:shadow="#808080 0.0403in 0.0403in" style:writing-mode="lr-tb"/>
    </style:style>
    <style:style style:name="Table28.A" style:family="table-column">
      <style:table-column-properties style:column-width="8.1194in" style:rel-column-width="65535*"/>
    </style:style>
    <style:style style:name="Table28.A1" style:family="table-cell">
      <style:table-cell-properties fo:padding="0.0382in" fo:border="0.75pt solid #000000"/>
    </style:style>
    <style:style style:name="Table18" style:family="table">
      <style:table-properties style:width="8.1194in" table:align="margins" style:shadow="#808080 0.0403in 0.0403in" style:writing-mode="lr-tb"/>
    </style:style>
    <style:style style:name="Table18.A" style:family="table-column">
      <style:table-column-properties style:column-width="8.1194in" style:rel-column-width="65535*"/>
    </style:style>
    <style:style style:name="Table18.A1" style:family="table-cell">
      <style:table-cell-properties fo:padding="0.0382in" fo:border="0.75pt solid #000000"/>
    </style:style>
    <style:style style:name="Table18.A2" style:family="table-cell">
      <style:table-cell-properties fo:padding="0.0382in" fo:border-left="0.75pt solid #000000" fo:border-right="0.75pt solid #000000" fo:border-top="none" fo:border-bottom="0.75pt solid #000000"/>
    </style:style>
    <style:style style:name="Table19" style:family="table">
      <style:table-properties style:width="8.1194in" table:align="margins" style:shadow="#808080 0.0403in 0.0403in" style:writing-mode="lr-tb"/>
    </style:style>
    <style:style style:name="Table19.A" style:family="table-column">
      <style:table-column-properties style:column-width="8.1194in" style:rel-column-width="65535*"/>
    </style:style>
    <style:style style:name="Table19.A1" style:family="table-cell">
      <style:table-cell-properties fo:padding="0.0382in" fo:border="0.75pt solid #000000"/>
    </style:style>
    <style:style style:name="Table5" style:family="table">
      <style:table-properties style:width="8.1194in" table:align="margins" style:shadow="#808080 0.0403in 0.0403in" style:writing-mode="lr-tb"/>
    </style:style>
    <style:style style:name="Table5.A" style:family="table-column">
      <style:table-column-properties style:column-width="8.1194in" style:rel-column-width="65535*"/>
    </style:style>
    <style:style style:name="Table5.A1" style:family="table-cell">
      <style:table-cell-properties fo:padding="0.0382in" fo:border="0.75pt solid #000000"/>
    </style:style>
    <style:style style:name="Table20" style:family="table">
      <style:table-properties style:width="8.1194in" table:align="margins" style:shadow="#808080 0.0403in 0.0403in" style:writing-mode="lr-tb"/>
    </style:style>
    <style:style style:name="Table20.A" style:family="table-column">
      <style:table-column-properties style:column-width="8.1194in" style:rel-column-width="65535*"/>
    </style:style>
    <style:style style:name="Table20.A1" style:family="table-cell">
      <style:table-cell-properties fo:padding="0.0382in" fo:border="0.75pt solid #000000"/>
    </style:style>
    <style:style style:name="Table26" style:family="table">
      <style:table-properties style:width="8.1194in" table:align="margins" style:shadow="#808080 0.0403in 0.0403in" style:writing-mode="lr-tb"/>
    </style:style>
    <style:style style:name="Table26.A" style:family="table-column">
      <style:table-column-properties style:column-width="8.1194in" style:rel-column-width="65535*"/>
    </style:style>
    <style:style style:name="Table26.A1" style:family="table-cell">
      <style:table-cell-properties fo:padding="0.0382in" fo:border="0.75pt solid #000000"/>
    </style:style>
    <style:style style:name="P1" style:family="paragraph" style:parent-style-name="Standard">
      <style:paragraph-properties fo:text-align="center" style:justify-single-word="false" style:writing-mode="lr-tb"/>
      <style:text-properties style:font-name="BlackChancery" fo:font-size="16pt" style:font-size-asian="16pt" style:font-size-complex="16pt"/>
    </style:style>
    <style:style style:name="P2" style:family="paragraph" style:parent-style-name="Standard">
      <style:text-properties officeooo:paragraph-rsid="044a74d1"/>
    </style:style>
    <style:style style:name="P3" style:family="paragraph" style:parent-style-name="Standard" style:list-style-name="L1">
      <style:text-properties style:font-name="Carlito" officeooo:rsid="0449e567" officeooo:paragraph-rsid="04466c36" style:font-name-complex="Carlito"/>
    </style:style>
    <style:style style:name="P4" style:family="paragraph" style:parent-style-name="Standard" style:list-style-name="L1">
      <style:text-properties style:font-name="Carlito" officeooo:rsid="044a003a" officeooo:paragraph-rsid="044a003a" style:font-name-complex="Carlito"/>
    </style:style>
    <style:style style:name="P5" style:family="paragraph" style:parent-style-name="Standard" style:list-style-name="L1">
      <style:text-properties style:font-name="Carlito" officeooo:rsid="044b8f46" officeooo:paragraph-rsid="044b8f46" style:font-name-complex="Carlito"/>
    </style:style>
    <style:style style:name="P6" style:family="paragraph" style:parent-style-name="Standard">
      <style:text-properties style:font-name="Carlito" officeooo:rsid="044b8f46" officeooo:paragraph-rsid="044b8f46" style:font-name-complex="Carlito"/>
    </style:style>
    <style:style style:name="P7" style:family="paragraph" style:parent-style-name="Standard">
      <style:text-properties officeooo:paragraph-rsid="06deea8a"/>
    </style:style>
    <style:style style:name="P8" style:family="paragraph" style:parent-style-name="Standard">
      <style:text-properties style:font-name="Carlito" fo:font-style="normal" officeooo:rsid="0292d43c" style:font-style-asian="normal" style:font-name-complex="Carlito" style:font-style-complex="normal"/>
    </style:style>
    <style:style style:name="P9" style:family="paragraph" style:parent-style-name="Standard">
      <style:paragraph-properties fo:text-align="center" style:justify-single-word="false"/>
      <style:text-properties style:font-name="BlackChancery" fo:font-size="14pt" officeooo:rsid="06e75358" officeooo:paragraph-rsid="06e75358" style:font-size-asian="14pt" style:font-size-complex="14pt"/>
    </style:style>
    <style:style style:name="P10" style:family="paragraph" style:parent-style-name="Standard">
      <style:text-properties fo:color="#127622" loext:opacity="100%" style:font-name="Gabriela Nerd Font" officeooo:rsid="04553ef7" officeooo:paragraph-rsid="04553ef7" style:font-name-complex="Carlito"/>
    </style:style>
    <style:style style:name="P11" style:family="paragraph" style:parent-style-name="Standard">
      <style:paragraph-properties fo:text-align="left" style:justify-single-word="false" style:writing-mode="lr-tb"/>
      <style:text-properties style:use-window-font-color="true" loext:opacity="0%" style:font-name="Carlito" fo:font-size="12pt" fo:font-weight="normal" officeooo:paragraph-rsid="041d0559" style:font-size-asian="12pt" style:font-weight-asian="normal" style:font-name-complex="Carlito" style:font-size-complex="12pt" style:font-weight-complex="normal"/>
    </style:style>
    <style:style style:name="P12" style:family="paragraph" style:parent-style-name="Standard" style:list-style-name="L2">
      <style:paragraph-properties fo:text-align="left" style:justify-single-word="false" style:writing-mode="lr-tb"/>
      <style:text-properties officeooo:paragraph-rsid="06e97b8e"/>
    </style:style>
    <style:style style:name="P13" style:family="paragraph" style:parent-style-name="Standard">
      <style:paragraph-properties fo:text-align="left" style:justify-single-word="false" style:writing-mode="lr-tb"/>
      <style:text-properties style:font-name="Carlito" fo:font-size="12pt" fo:font-weight="normal" officeooo:rsid="01676bf8" officeooo:paragraph-rsid="02ef510f" style:font-size-asian="12pt" style:font-weight-asian="normal" style:font-name-complex="Carlito" style:font-size-complex="12pt" style:font-weight-complex="normal"/>
    </style:style>
    <style:style style:name="P14" style:family="paragraph" style:parent-style-name="Standard">
      <style:paragraph-properties fo:text-align="center" style:justify-single-word="false"/>
      <style:text-properties style:font-name="BlackChancery" fo:font-size="14pt" officeooo:rsid="06e8559d" officeooo:paragraph-rsid="06e8559d" style:font-size-asian="14pt" style:font-size-complex="14pt"/>
    </style:style>
    <style:style style:name="P15" style:family="paragraph" style:parent-style-name="Standard">
      <style:text-properties fo:color="#127622" loext:opacity="100%" style:font-name="Gabriela Nerd Font" officeooo:rsid="04553ef7" officeooo:paragraph-rsid="06e97b8e" style:font-name-complex="Carlito"/>
    </style:style>
    <style:style style:name="P16" style:family="paragraph" style:parent-style-name="Table_20_Contents">
      <style:text-properties style:font-name="Carlito" officeooo:paragraph-rsid="080bdee1" style:font-name-complex="Carlito"/>
    </style:style>
    <style:style style:name="P17" style:family="paragraph" style:parent-style-name="Standard">
      <style:text-properties fo:color="#127622" loext:opacity="100%" style:font-name="Gabriela Nerd Font" officeooo:rsid="04553ef7" officeooo:paragraph-rsid="080f56c9" style:font-name-complex="Carlito"/>
    </style:style>
    <style:style style:name="P18" style:family="paragraph" style:parent-style-name="Standard">
      <style:text-properties fo:color="#127622" loext:opacity="100%" style:font-name="Gabriela Nerd Font" officeooo:rsid="04553ef7" officeooo:paragraph-rsid="0176b4bb" style:font-name-complex="Carlito"/>
    </style:style>
    <style:style style:name="P19" style:family="paragraph" style:parent-style-name="Table_20_Contents">
      <style:text-properties style:font-name="Carlito" officeooo:paragraph-rsid="02f2255c" style:font-name-complex="Carlito"/>
    </style:style>
    <style:style style:name="P20" style:family="paragraph" style:parent-style-name="Table_20_Contents">
      <style:text-properties officeooo:paragraph-rsid="02f29696"/>
    </style:style>
    <style:style style:name="P21" style:family="paragraph" style:parent-style-name="Table_20_Contents">
      <style:text-properties style:font-name="Carlito" officeooo:paragraph-rsid="02f29696" style:font-name-complex="Carlito"/>
    </style:style>
    <style:style style:name="P22" style:family="paragraph" style:parent-style-name="Table_20_Contents">
      <style:text-properties officeooo:paragraph-rsid="080a269b"/>
    </style:style>
    <style:style style:name="P23" style:family="paragraph" style:parent-style-name="Standard" style:list-style-name="L3">
      <style:paragraph-properties fo:text-align="left" style:justify-single-word="false" style:writing-mode="lr-tb"/>
      <style:text-properties style:font-name="Carlito" fo:font-size="12pt" fo:font-weight="normal" officeooo:rsid="03844290" officeooo:paragraph-rsid="03844290" style:font-size-asian="12pt" style:font-weight-asian="normal" style:font-name-complex="Carlito" style:font-size-complex="12pt" style:font-weight-complex="normal"/>
    </style:style>
    <style:style style:name="P24" style:family="paragraph" style:parent-style-name="Standard">
      <style:paragraph-properties fo:text-align="center" style:justify-single-word="false"/>
      <style:text-properties style:font-name="BlackChancery" fo:font-size="14pt" officeooo:rsid="06f93011" officeooo:paragraph-rsid="06f93011" style:font-size-asian="14pt" style:font-size-complex="14pt"/>
    </style:style>
    <style:style style:name="P25" style:family="paragraph" style:parent-style-name="Table_20_Contents">
      <style:paragraph-properties fo:text-align="center" style:justify-single-word="false"/>
      <style:text-properties officeooo:paragraph-rsid="03891641"/>
    </style:style>
    <style:style style:name="P26" style:family="paragraph" style:parent-style-name="Standard">
      <style:text-properties officeooo:paragraph-rsid="0176b4bb"/>
    </style:style>
    <style:style style:name="P27" style:family="paragraph" style:parent-style-name="Table_20_Contents">
      <style:paragraph-properties fo:text-align="center" style:justify-single-word="false"/>
      <style:text-properties style:font-name="Carlito" officeooo:rsid="01c278b0" officeooo:paragraph-rsid="01c278b0" style:font-name-complex="Carlito"/>
    </style:style>
    <style:style style:name="P28" style:family="paragraph" style:parent-style-name="Table_20_Contents">
      <style:text-properties style:font-name="Carlito" officeooo:paragraph-rsid="043f59a9" style:font-name-complex="Carlito"/>
    </style:style>
    <style:style style:name="P29" style:family="paragraph" style:parent-style-name="Table_20_Contents">
      <style:text-properties officeooo:paragraph-rsid="043ec3cd"/>
    </style:style>
    <style:style style:name="P30" style:family="paragraph" style:parent-style-name="Table_20_Contents">
      <style:text-properties style:font-name="Carlito" officeooo:paragraph-rsid="043ec3cd" fo:background-color="transparent" style:font-name-complex="Carlito"/>
    </style:style>
    <style:style style:name="P31" style:family="paragraph" style:parent-style-name="Table_20_Contents">
      <style:text-properties style:font-name="Carlito" style:font-name-complex="Carlito"/>
    </style:style>
    <style:style style:name="P32" style:family="paragraph" style:parent-style-name="Table_20_Contents">
      <style:text-properties style:font-name="Carlito" officeooo:rsid="02e75aff" officeooo:paragraph-rsid="02e75aff" style:font-name-complex="Carlito"/>
    </style:style>
    <style:style style:name="P33" style:family="paragraph" style:parent-style-name="Standard">
      <style:paragraph-properties fo:text-align="center" style:justify-single-word="false"/>
      <style:text-properties style:font-name="Carlito" officeooo:rsid="0296b85c" style:font-name-complex="Carlito"/>
    </style:style>
    <style:style style:name="P34" style:family="paragraph" style:parent-style-name="Standard">
      <style:paragraph-properties fo:text-align="center" style:justify-single-word="false"/>
      <style:text-properties style:font-name="BlackChancery" fo:font-size="14pt" style:font-size-asian="14pt" style:font-size-complex="14pt"/>
    </style:style>
    <style:style style:name="P35" style:family="paragraph" style:parent-style-name="Standard">
      <style:paragraph-properties style:writing-mode="lr-tb"/>
      <style:text-properties style:font-name="Carlito" fo:font-size="12pt" officeooo:paragraph-rsid="021bcae8" style:font-size-asian="12pt" style:font-name-complex="Carlito" style:font-size-complex="12pt"/>
    </style:style>
    <style:style style:name="P36" style:family="paragraph" style:parent-style-name="Standard" style:list-style-name="L4">
      <style:text-properties style:font-name="Carlito" fo:font-size="12pt" style:font-size-asian="12pt" style:font-name-complex="Carlito" style:font-size-complex="12pt"/>
    </style:style>
    <style:style style:name="P37" style:family="paragraph" style:parent-style-name="Table_20_Contents">
      <style:text-properties officeooo:paragraph-rsid="01782037"/>
    </style:style>
    <style:style style:name="P38" style:family="paragraph" style:parent-style-name="Table_20_Contents">
      <style:paragraph-properties fo:text-align="center" style:justify-single-word="false"/>
      <style:text-properties style:font-name="Carlito" fo:font-size="12pt" fo:font-weight="bold" officeooo:paragraph-rsid="029b84ff" style:font-size-asian="12pt" style:font-weight-asian="bold" style:font-name-complex="Carlito" style:font-size-complex="12pt" style:font-weight-complex="bold"/>
    </style:style>
    <style:style style:name="P39" style:family="paragraph" style:parent-style-name="Table_20_Contents">
      <style:paragraph-properties fo:text-align="center" style:justify-single-word="false"/>
      <style:text-properties style:font-name="Carlito" fo:font-size="12pt" officeooo:paragraph-rsid="029b84ff" style:font-size-asian="12pt" style:font-name-complex="Carlito" style:font-size-complex="12pt"/>
    </style:style>
    <style:style style:name="P40" style:family="paragraph" style:parent-style-name="Table_20_Contents">
      <style:text-properties style:font-name="Carlito" fo:font-size="12pt" officeooo:paragraph-rsid="029b84ff" style:font-size-asian="12pt" style:font-name-complex="Carlito" style:font-size-complex="12pt"/>
    </style:style>
    <style:style style:name="P41" style:family="paragraph" style:parent-style-name="Table_20_Contents">
      <style:text-properties style:font-name="Carlito" fo:font-size="12pt" officeooo:paragraph-rsid="01782037" style:font-size-asian="12pt" style:font-name-complex="Carlito" style:font-size-complex="12pt"/>
    </style:style>
    <style:style style:name="P42" style:family="paragraph" style:parent-style-name="Table_20_Contents">
      <style:text-properties style:font-name="Carlito" fo:font-size="12pt" fo:font-weight="bold" officeooo:rsid="03e8f303" officeooo:paragraph-rsid="03e8f303" style:font-size-asian="12pt" style:font-weight-asian="bold" style:font-name-complex="Carlito" style:font-size-complex="12pt" style:font-weight-complex="bold"/>
    </style:style>
    <style:style style:name="P43" style:family="paragraph" style:parent-style-name="Table_20_Contents">
      <style:text-properties style:font-name="Carlito" fo:font-size="12pt" officeooo:paragraph-rsid="03f2b3e0" style:font-size-asian="12pt" style:font-name-complex="Carlito" style:font-size-complex="12pt"/>
    </style:style>
    <style:style style:name="P44" style:family="paragraph" style:parent-style-name="Table_20_Contents">
      <style:text-properties style:font-name="Carlito" fo:font-size="12pt" officeooo:paragraph-rsid="03f50a72" style:font-size-asian="12pt" style:font-name-complex="Carlito" style:font-size-complex="12pt"/>
    </style:style>
    <style:style style:name="P45" style:family="paragraph" style:parent-style-name="Table_20_Contents">
      <style:paragraph-properties fo:text-align="left" style:justify-single-word="false"/>
      <style:text-properties style:font-name="Carlito" fo:font-size="12pt" fo:font-weight="normal" officeooo:rsid="03f6dae3" officeooo:paragraph-rsid="03f6dae3" style:font-size-asian="12pt" style:font-weight-asian="normal" style:font-name-complex="Carlito" style:font-size-complex="12pt" style:font-weight-complex="normal"/>
    </style:style>
    <style:style style:name="P46"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000000" loext:opacity="100%" style:font-name="Carlito" fo:font-size="12pt" fo:language="en" fo:country="US" fo:font-weight="bold" officeooo:paragraph-rsid="01782037" style:letter-kerning="false" style:font-name-asian="DejaVu Sans" style:font-size-asian="12pt" style:language-asian="zh" style:country-asian="CN" style:font-weight-asian="bold" style:font-name-complex="Carlito" style:font-size-complex="12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center" style:justify-single-word="false"/>
      <style:text-properties style:font-name="Carlito" fo:font-size="12pt" fo:font-weight="bold" officeooo:paragraph-rsid="029bb151" style:font-size-asian="12pt" style:font-weight-asian="bold" style:font-name-complex="Carlito" style:font-size-complex="12pt" style:font-weight-complex="bold"/>
    </style:style>
    <style:style style:name="P48" style:family="paragraph" style:parent-style-name="Table_20_Contents">
      <style:paragraph-properties fo:text-align="center" style:justify-single-word="false"/>
      <style:text-properties style:font-name="Carlito" fo:font-size="12pt" officeooo:paragraph-rsid="029bb151" style:font-size-asian="12pt" style:font-name-complex="Carlito" style:font-size-complex="12pt"/>
    </style:style>
    <style:style style:name="P49" style:family="paragraph" style:parent-style-name="Standard" style:list-style-name="L5"/>
    <style:style style:name="P50" style:family="paragraph" style:parent-style-name="Table_20_Contents">
      <style:paragraph-properties fo:margin-top="0in" fo:margin-bottom="0in" style:contextual-spacing="false" fo:text-align="center" style:justify-single-word="false" fo:hyphenation-ladder-count="no-limit" fo:hyphenation-keep="auto" loext:hyphenation-keep-type="column" loext:hyphenation-keep-line="false" style:writing-mode="lr-tb"/>
      <style:text-properties fo:color="#000000" loext:opacity="100%" style:font-name="BlackChancery" fo:font-size="14pt" officeooo:paragraph-rsid="07a570de" style:letter-kerning="false" style:font-name-asian="DejaVu Sans" style:font-size-asian="14pt" style:font-name-complex="Carlito" style:font-size-complex="14pt"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style:writing-mode="lr-tb"/>
    </style:style>
    <style:style style:name="P52" style:family="paragraph" style:parent-style-name="Table_20_Contents">
      <style:text-properties officeooo:paragraph-rsid="05ee55af"/>
    </style:style>
    <style:style style:name="P53" style:family="paragraph" style:parent-style-name="Table_20_Contents">
      <style:text-properties officeooo:paragraph-rsid="05e55a49"/>
    </style:style>
    <style:style style:name="P54"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officeooo:paragraph-rsid="05e55a49"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list-style-name="L6">
      <style:paragraph-properties style:writing-mode="lr-tb"/>
      <style:text-properties officeooo:paragraph-rsid="0749ae07"/>
    </style:style>
    <style:style style:name="P56" style:family="paragraph" style:parent-style-name="Standard" style:list-style-name="L6">
      <style:paragraph-properties style:writing-mode="lr-tb"/>
      <style:text-properties officeooo:paragraph-rsid="05eeefe6"/>
    </style:style>
    <style:style style:name="P57" style:family="paragraph" style:parent-style-name="Standard" style:list-style-name="L6">
      <style:paragraph-properties style:writing-mode="lr-tb"/>
    </style:style>
    <style:style style:name="P58" style:family="paragraph" style:parent-style-name="Standard">
      <style:paragraph-properties style:writing-mode="lr-tb"/>
      <style:text-properties officeooo:rsid="07be3003" officeooo:paragraph-rsid="07be3003"/>
    </style:style>
    <style:style style:name="P59" style:family="paragraph" style:parent-style-name="Standard">
      <style:text-properties fo:color="#127622" loext:opacity="100%" style:font-name="Gabriela Nerd Font" officeooo:rsid="04553ef7" officeooo:paragraph-rsid="07a570de" style:font-name-complex="Carlito"/>
    </style:style>
    <style:style style:name="P60" style:family="paragraph" style:parent-style-name="Table_20_Contents">
      <style:text-properties style:font-name="Carlito" fo:font-size="12pt" officeooo:paragraph-rsid="07a570de" style:font-size-asian="12pt" style:font-name-complex="Carlito" style:font-size-complex="12pt"/>
    </style:style>
    <style:style style:name="P61" style:family="paragraph" style:parent-style-name="Table_20_Contents">
      <style:text-properties officeooo:paragraph-rsid="07a570de"/>
    </style:style>
    <style:style style:name="P62" style:family="paragraph" style:parent-style-name="Standard">
      <style:paragraph-properties fo:text-align="center" style:justify-single-word="false"/>
      <style:text-properties style:font-name="BlackChancery" fo:font-size="14pt" officeooo:rsid="048d0179" officeooo:paragraph-rsid="07a570de" style:font-size-asian="14pt" style:font-name-complex="Carlito" style:font-size-complex="14pt"/>
    </style:style>
    <style:style style:name="P63" style:family="paragraph" style:parent-style-name="Standard">
      <style:paragraph-properties fo:text-align="left" style:justify-single-word="false" style:writing-mode="lr-tb"/>
      <style:text-properties officeooo:paragraph-rsid="07a570de"/>
    </style:style>
    <style:style style:name="P64" style:family="paragraph" style:parent-style-name="Standard">
      <style:paragraph-properties fo:text-align="left" style:justify-single-word="false" style:writing-mode="lr-tb"/>
      <style:text-properties style:font-name="Carlito" fo:font-size="12pt" fo:font-weight="normal" officeooo:paragraph-rsid="07a570de" style:font-size-asian="12pt" style:font-weight-asian="normal" style:font-name-complex="Carlito" style:font-size-complex="12pt" style:font-weight-complex="normal"/>
    </style:style>
    <style:style style:name="P65" style:family="paragraph" style:parent-style-name="Standard" style:list-style-name="L7">
      <style:paragraph-properties fo:text-align="left" style:justify-single-word="false" style:writing-mode="lr-tb"/>
      <style:text-properties officeooo:paragraph-rsid="07a570de"/>
    </style:style>
    <style:style style:name="P66" style:family="paragraph" style:parent-style-name="Standard" style:list-style-name="L7">
      <style:paragraph-properties fo:text-align="left" style:justify-single-word="false" style:writing-mode="lr-tb"/>
      <style:text-properties style:font-name="Carlito" fo:font-size="12pt" fo:font-weight="normal" officeooo:rsid="02a0b524" officeooo:paragraph-rsid="07a570de" style:font-size-asian="12pt" style:font-weight-asian="normal" style:font-name-complex="Carlito" style:font-size-complex="12pt" style:font-weight-complex="normal"/>
    </style:style>
    <style:style style:name="P67" style:family="paragraph" style:parent-style-name="Standard" style:list-style-name="L7">
      <style:paragraph-properties fo:text-align="left" style:justify-single-word="false" style:writing-mode="lr-tb"/>
      <style:text-properties style:font-name="Carlito" fo:font-size="12pt" fo:font-weight="normal" officeooo:rsid="0014d882" officeooo:paragraph-rsid="07a570de" style:font-size-asian="12pt" style:font-weight-asian="normal" style:font-name-complex="Carlito" style:font-size-complex="12pt" style:font-weight-complex="normal"/>
    </style:style>
    <style:style style:name="P68" style:family="paragraph" style:parent-style-name="Standard" style:list-style-name="L7">
      <style:paragraph-properties fo:text-align="left" style:justify-single-word="false" style:writing-mode="lr-tb"/>
      <style:text-properties style:font-name="Carlito" fo:font-size="12pt" fo:font-weight="normal" officeooo:rsid="0046bd6a" officeooo:paragraph-rsid="07a570de" style:font-size-asian="12pt" style:font-weight-asian="normal" style:font-name-complex="Carlito" style:font-size-complex="12pt" style:font-weight-complex="normal"/>
    </style:style>
    <style:style style:name="P69" style:family="paragraph" style:parent-style-name="Standard">
      <style:paragraph-properties fo:text-align="center" style:justify-single-word="false"/>
      <style:text-properties officeooo:rsid="07d1b320" officeooo:paragraph-rsid="07d8fb84"/>
    </style:style>
    <style:style style:name="P70" style:family="paragraph" style:parent-style-name="Standard">
      <style:paragraph-properties fo:text-align="left" style:justify-single-word="false" style:writing-mode="lr-tb"/>
      <style:text-properties style:font-name="Carlito" fo:font-size="12pt" style:text-underline-style="none" fo:font-weight="normal" officeooo:rsid="01e5d337" officeooo:paragraph-rsid="07d8fb84" style:font-size-asian="12pt" style:font-weight-asian="normal" style:font-name-complex="Carlito" style:font-size-complex="12pt" style:font-weight-complex="normal"/>
    </style:style>
    <style:style style:name="P71" style:family="paragraph" style:parent-style-name="Standard">
      <style:text-properties fo:color="#127622" loext:opacity="100%" style:font-name="Gabriela Nerd Font" officeooo:rsid="04553ef7" officeooo:paragraph-rsid="07d8fb84" style:font-name-complex="Carlito"/>
    </style:style>
    <style:style style:name="P72" style:family="paragraph" style:parent-style-name="Table_20_Contents">
      <style:text-properties officeooo:paragraph-rsid="07d8fb84"/>
    </style:style>
    <style:style style:name="P73" style:family="paragraph" style:parent-style-name="Standard">
      <style:text-properties officeooo:paragraph-rsid="07d8fb84"/>
    </style:style>
    <style:style style:name="P74" style:family="paragraph" style:parent-style-name="Standard" style:list-style-name="L8">
      <style:text-properties officeooo:rsid="07b9f221" officeooo:paragraph-rsid="07d8fb84"/>
    </style:style>
    <style:style style:name="P75" style:family="paragraph" style:parent-style-name="Standard" style:list-style-name="L8">
      <style:text-properties officeooo:paragraph-rsid="07db0178"/>
    </style:style>
    <style:style style:name="P76" style:family="paragraph" style:parent-style-name="Standard">
      <style:text-properties officeooo:rsid="07b9f221" officeooo:paragraph-rsid="07d8fb84"/>
    </style:style>
    <style:style style:name="P77" style:family="paragraph" style:parent-style-name="Standard">
      <style:paragraph-properties fo:text-align="center" style:justify-single-word="false"/>
      <style:text-properties style:font-name="BlackChancery" fo:font-size="14pt" officeooo:rsid="0794fc3e" officeooo:paragraph-rsid="0794fc3e" style:font-size-asian="14pt" style:font-size-complex="14pt"/>
    </style:style>
    <style:style style:name="P78" style:family="paragraph" style:parent-style-name="Standard">
      <style:paragraph-properties fo:text-align="left" style:justify-single-word="false" style:writing-mode="lr-tb"/>
      <style:text-properties officeooo:paragraph-rsid="0417ed0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text-properties fo:color="#127622" loext:opacity="100%" style:font-name="Gabriela Nerd Font" officeooo:rsid="04553ef7" officeooo:paragraph-rsid="0417ed04" style:font-size-asian="12pt" style:font-style-asian="normal" style:font-weight-asian="normal" style:font-name-complex="Carlito" style:font-size-complex="12pt" style:font-style-complex="normal" style:font-weight-complex="normal" style:text-overline-style="none" style:text-overline-color="font-color"/>
    </style:style>
    <style:style style:name="P80" style:family="paragraph" style:parent-style-name="Standard">
      <style:paragraph-properties fo:text-align="left" style:justify-single-word="false" style:writing-mode="lr-tb"/>
      <style:text-properties style:font-name="Carlito" fo:font-size="12pt" officeooo:paragraph-rsid="00551b83" style:font-size-asian="12pt" style:font-style-asian="normal" style:font-weight-asian="normal" style:font-name-complex="Carlito" style:font-size-complex="12pt" style:font-style-complex="normal" style:font-weight-complex="normal" style:text-overline-style="none" style:text-overline-color="font-color"/>
    </style:style>
    <style:style style:name="P81" style:family="paragraph" style:parent-style-name="Standard" style:list-style-name="L9">
      <style:paragraph-properties fo:text-align="left" style:justify-single-word="false" style:writing-mode="lr-tb"/>
      <style:text-properties officeooo:paragraph-rsid="07d8853a"/>
    </style:style>
    <style:style style:name="P82" style:family="paragraph" style:parent-style-name="Standard" style:list-style-name="L9">
      <style:paragraph-properties fo:text-align="left" style:justify-single-word="false" style:writing-mode="lr-tb"/>
      <style:text-properties officeooo:paragraph-rsid="071022bf"/>
    </style:style>
    <style:style style:name="P83" style:family="paragraph" style:parent-style-name="Standard" style:list-style-name="L9">
      <style:paragraph-properties fo:text-align="left" style:justify-single-word="false" style:writing-mode="lr-tb"/>
      <style:text-properties style:use-window-font-color="true" loext:opacity="0%" style:font-name="Carlito" fo:font-size="12pt" fo:font-weight="normal" officeooo:rsid="06374bf8" officeooo:paragraph-rsid="06374bf8" style:font-size-asian="12pt" style:font-weight-asian="normal" style:font-name-complex="Carlito" style:font-size-complex="12pt" style:font-weight-complex="normal"/>
    </style:style>
    <style:style style:name="P84" style:family="paragraph" style:parent-style-name="Standard" style:list-style-name="L9">
      <style:paragraph-properties fo:text-align="left" style:justify-single-word="false" style:writing-mode="lr-tb"/>
      <style:text-properties style:font-name="Carlito" fo:font-size="12pt" fo:font-weight="normal" officeooo:rsid="00ddada0" officeooo:paragraph-rsid="0841b320" style:font-size-asian="12pt" style:font-weight-asian="normal" style:font-name-complex="Carlito" style:font-size-complex="12pt" style:font-weight-complex="normal"/>
    </style:style>
    <style:style style:name="P85" style:family="paragraph" style:parent-style-name="Standard">
      <style:paragraph-properties fo:text-align="left" style:justify-single-word="false" style:writing-mode="lr-tb"/>
      <style:text-properties style:font-name="Carlito" fo:font-size="12pt" fo:font-weight="normal" officeooo:rsid="00ddada0" officeooo:paragraph-rsid="070fb48e" style:font-size-asian="12pt" style:font-weight-asian="normal" style:font-name-complex="Carlito" style:font-size-complex="12pt" style:font-weight-complex="normal"/>
    </style:style>
    <style:style style:name="P86" style:family="paragraph" style:parent-style-name="Standard">
      <style:paragraph-properties fo:text-align="center" style:justify-single-word="false"/>
      <style:text-properties style:font-name="BlackChancery" fo:font-size="14pt" officeooo:rsid="0751a28d" officeooo:paragraph-rsid="07d54cad" style:font-size-asian="12.25pt" style:font-size-complex="14pt"/>
    </style:style>
    <style:style style:name="P87" style:family="paragraph" style:parent-style-name="Standard">
      <style:text-properties officeooo:paragraph-rsid="07d54cad"/>
    </style:style>
    <style:style style:name="P88" style:family="paragraph" style:parent-style-name="Table_20_Contents">
      <style:text-properties officeooo:paragraph-rsid="07d54cad"/>
    </style:style>
    <style:style style:name="P89" style:family="paragraph" style:parent-style-name="Standard" style:list-style-name="L10">
      <style:text-properties officeooo:paragraph-rsid="07f2f5b7"/>
    </style:style>
    <style:style style:name="P90" style:family="paragraph" style:parent-style-name="Standard">
      <style:paragraph-properties fo:text-align="center" style:justify-single-word="false"/>
      <style:text-properties style:font-name="BlackChancery" fo:font-size="14pt" officeooo:rsid="07fd6cbe" officeooo:paragraph-rsid="07fd6cbe" style:font-size-asian="12.25pt" style:font-size-complex="14pt"/>
    </style:style>
    <style:style style:name="P91" style:family="paragraph" style:parent-style-name="Standard">
      <style:text-properties officeooo:rsid="07fa8b37" officeooo:paragraph-rsid="07fa8b37"/>
    </style:style>
    <style:style style:name="P92"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127622" loext:opacity="100%" style:font-name="Gabriela Nerd Font" fo:font-size="12pt" fo:language="en" fo:country="US" officeooo:rsid="07ee8e79" officeooo:paragraph-rsid="07f9647c"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93" style:family="paragraph" style:parent-style-name="Table_20_Contents">
      <style:text-properties officeooo:paragraph-rsid="07f9647c"/>
    </style:style>
    <style:style style:name="P94" style:family="paragraph" style:parent-style-name="Table_20_Contents">
      <style:paragraph-properties style:writing-mode="lr-tb"/>
      <style:text-properties fo:language="en" fo:country="US" style:language-asian="zh" style:country-asian="CN" style:language-complex="hi" style:country-complex="IN"/>
    </style:style>
    <style:style style:name="P95"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127622" loext:opacity="100%" style:font-name="Gabriela Nerd Font" fo:font-size="12pt" fo:language="en" fo:country="US" officeooo:rsid="07ee8e79" officeooo:paragraph-rsid="083864be"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list-style-name="L11">
      <style:text-properties officeooo:rsid="07ffd7da" officeooo:paragraph-rsid="07ffd7da"/>
    </style:style>
    <style:style style:name="P97" style:family="paragraph" style:parent-style-name="Standard" style:list-style-name="L11">
      <style:text-properties officeooo:rsid="07fc3b36" officeooo:paragraph-rsid="07fc3b36"/>
    </style:style>
    <style:style style:name="P98" style:family="paragraph" style:parent-style-name="Standard">
      <style:paragraph-properties fo:text-align="center" style:justify-single-word="false"/>
      <style:text-properties officeooo:paragraph-rsid="0816cc22"/>
    </style:style>
    <style:style style:name="P99" style:family="paragraph" style:parent-style-name="Standard">
      <style:text-properties officeooo:paragraph-rsid="07c963f5"/>
    </style:style>
    <style:style style:name="P100" style:family="paragraph" style:parent-style-name="Table_20_Contents">
      <style:text-properties officeooo:paragraph-rsid="07c963f5"/>
    </style:style>
    <style:style style:name="P101" style:family="paragraph" style:parent-style-name="Standard" style:list-style-name="L12">
      <style:paragraph-properties style:writing-mode="lr-tb"/>
    </style:style>
    <style:style style:name="P102" style:family="paragraph" style:parent-style-name="Standard" style:list-style-name="L12">
      <style:paragraph-properties fo:text-align="left" style:justify-single-word="false" style:writing-mode="lr-tb"/>
      <style:text-properties officeooo:paragraph-rsid="07c963f5"/>
    </style:style>
    <style:style style:name="P103" style:family="paragraph" style:parent-style-name="Standard">
      <style:text-properties fo:color="#127622" loext:opacity="100%" style:font-name="Gabriela Nerd Font" officeooo:rsid="04553ef7" officeooo:paragraph-rsid="07c963f5" style:font-name-complex="Carlito"/>
    </style:style>
    <style:style style:name="P104" style:family="paragraph" style:parent-style-name="Table_20_Contents">
      <style:text-properties style:font-name="Carlito" officeooo:paragraph-rsid="07c963f5" style:font-name-complex="Carlito"/>
    </style:style>
    <style:style style:name="P105" style:family="paragraph" style:parent-style-name="Standard" style:list-style-name="L13">
      <style:paragraph-properties fo:text-align="left" style:justify-single-word="false" style:writing-mode="lr-tb"/>
      <style:text-properties officeooo:paragraph-rsid="07c963f5"/>
    </style:style>
    <style:style style:name="P106" style:family="paragraph" style:parent-style-name="Standard" style:list-style-name="L13">
      <style:paragraph-properties fo:text-align="left" style:justify-single-word="false" style:writing-mode="lr-tb"/>
      <style:text-properties officeooo:paragraph-rsid="0823b52d"/>
    </style:style>
    <style:style style:name="P107" style:family="paragraph" style:parent-style-name="Standard" style:list-style-name="L14">
      <style:paragraph-properties fo:text-align="left" style:justify-single-word="false" style:writing-mode="lr-tb"/>
      <style:text-properties style:font-name="Carlito" fo:font-size="12pt" officeooo:rsid="03b3252c" officeooo:paragraph-rsid="07c963f5" style:font-size-asian="12pt" style:font-name-complex="Carlito" style:font-size-complex="12pt"/>
    </style:style>
    <style:style style:name="P108" style:family="paragraph" style:parent-style-name="Standard" style:list-style-name="L14">
      <style:paragraph-properties fo:text-align="left" style:justify-single-word="false" style:writing-mode="lr-tb"/>
      <style:text-properties officeooo:paragraph-rsid="07c963f5"/>
    </style:style>
    <style:style style:name="P109" style:family="paragraph" style:parent-style-name="Standard">
      <style:paragraph-properties fo:text-align="center" style:justify-single-word="false"/>
      <style:text-properties style:font-name="BlackChancery" fo:font-size="14pt" officeooo:rsid="0816cc22" officeooo:paragraph-rsid="0816cc22" style:font-size-asian="12.25pt" style:font-size-complex="14pt"/>
    </style:style>
    <style:style style:name="P110" style:family="paragraph" style:parent-style-name="Standard">
      <style:paragraph-properties style:writing-mode="lr-tb"/>
      <style:text-properties officeooo:paragraph-rsid="0819d4fa"/>
    </style:style>
    <style:style style:name="P111" style:family="paragraph" style:parent-style-name="Table_20_Contents">
      <style:text-properties officeooo:paragraph-rsid="0819d4fa"/>
    </style:style>
    <style:style style:name="P112"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127622" loext:opacity="100%" style:font-name="Gabriela Nerd Font" fo:font-size="12pt" fo:language="en" fo:country="US" officeooo:rsid="04553ef7" officeooo:paragraph-rsid="0819d4fa"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13" style:family="paragraph" style:parent-style-name="Standard" style:list-style-name="L15">
      <style:paragraph-properties fo:text-align="left" style:justify-single-word="false" style:writing-mode="lr-tb"/>
      <style:text-properties officeooo:paragraph-rsid="0819d4fa"/>
    </style:style>
    <style:style style:name="P114" style:family="paragraph" style:parent-style-name="Standard" style:list-style-name="L15">
      <style:paragraph-properties fo:text-align="left" style:justify-single-word="false" style:writing-mode="lr-tb"/>
      <style:text-properties style:font-name="Carlito" fo:font-size="12pt" fo:font-style="normal" fo:font-weight="normal" officeooo:rsid="081e474f" officeooo:paragraph-rsid="081e474f" style:font-size-asian="12pt" style:font-style-asian="normal" style:font-weight-asian="normal" style:font-name-complex="Carlito" style:font-size-complex="12pt" style:font-style-complex="normal" style:font-weight-complex="normal"/>
    </style:style>
    <style:style style:name="P115" style:family="paragraph" style:parent-style-name="Standard">
      <style:paragraph-properties fo:text-align="center" style:justify-single-word="false" style:writing-mode="lr-tb"/>
      <style:text-properties officeooo:paragraph-rsid="04b007f2"/>
    </style:style>
    <style:style style:name="P116" style:family="paragraph" style:parent-style-name="Standard">
      <style:text-properties fo:color="#127622" loext:opacity="100%" style:font-name="Gabriela Nerd Font" officeooo:rsid="04553ef7" officeooo:paragraph-rsid="0417ed04" style:font-name-complex="Carlito"/>
    </style:style>
    <style:style style:name="P117" style:family="paragraph" style:parent-style-name="Table_20_Contents">
      <style:text-properties fo:color="#ff0000" loext:opacity="100%" style:font-name="Carlito" fo:font-size="12pt" officeooo:paragraph-rsid="00bcf2e7" style:font-size-asian="12pt" style:font-name-complex="Carlito" style:font-size-complex="12pt"/>
    </style:style>
    <style:style style:name="P118" style:family="paragraph" style:parent-style-name="Standard">
      <style:text-properties fo:color="#127622" loext:opacity="100%" style:font-name="Gabriela Nerd Font" officeooo:rsid="04553ef7" officeooo:paragraph-rsid="075d001f" style:font-name-complex="Carlito"/>
    </style:style>
    <style:style style:name="P119" style:family="paragraph" style:parent-style-name="Standard" style:list-style-name="L16">
      <style:text-properties officeooo:paragraph-rsid="082c1bb0"/>
    </style:style>
    <style:style style:name="P120" style:family="paragraph" style:parent-style-name="Standard" style:list-style-name="L16">
      <style:text-properties officeooo:paragraph-rsid="0856c0fa"/>
    </style:style>
    <style:style style:name="P121" style:family="paragraph" style:parent-style-name="Standard">
      <style:text-properties officeooo:paragraph-rsid="01016671"/>
    </style:style>
    <style:style style:name="P122" style:family="paragraph" style:parent-style-name="Standard">
      <style:paragraph-properties fo:text-align="center" style:justify-single-word="false"/>
      <style:text-properties style:font-name="BlackChancery" fo:font-size="14pt" fo:font-style="normal" fo:font-weight="normal" officeooo:rsid="04b95c46" officeooo:paragraph-rsid="04b95c46" style:font-size-asian="12.25pt" style:font-style-asian="normal" style:font-weight-asian="normal" style:font-name-complex="Carlito" style:font-size-complex="14pt" style:font-style-complex="normal" style:font-weight-complex="normal"/>
    </style:style>
    <style:style style:name="P123" style:family="paragraph" style:parent-style-name="Table_20_Contents">
      <style:text-properties style:use-window-font-color="true" loext:opacity="0%" style:font-name="Carlito" officeooo:paragraph-rsid="03b9a0a8" style:font-name-complex="Carlito"/>
    </style:style>
    <style:style style:name="P124" style:family="paragraph" style:parent-style-name="Standard">
      <style:text-properties fo:color="#127622" loext:opacity="100%" style:font-name="Gabriela Nerd Font" officeooo:rsid="04553ef7" officeooo:paragraph-rsid="06554d7b" style:font-name-complex="Carlito"/>
    </style:style>
    <style:style style:name="P125" style:family="paragraph" style:parent-style-name="Standard">
      <style:text-properties fo:color="#127622" loext:opacity="100%" style:font-name="Gabriela Nerd Font" officeooo:rsid="04553ef7" officeooo:paragraph-rsid="0916f193" style:font-name-complex="Carlito"/>
    </style:style>
    <style:style style:name="P126" style:family="paragraph" style:parent-style-name="Standard">
      <style:text-properties style:font-name="Carlito" fo:font-size="12pt" fo:font-style="normal" fo:font-weight="normal" officeooo:rsid="0380182c" officeooo:paragraph-rsid="08294a6b" style:font-size-asian="12pt" style:font-style-asian="normal" style:font-weight-asian="normal" style:font-name-complex="Carlito" style:font-size-complex="12pt" style:font-style-complex="normal" style:font-weight-complex="normal"/>
    </style:style>
    <style:style style:name="P127" style:family="paragraph" style:parent-style-name="Standard">
      <style:paragraph-properties fo:text-align="center" style:justify-single-word="false"/>
      <style:text-properties style:font-name="BlackChancery" fo:font-size="14pt" fo:font-style="normal" fo:font-weight="normal" officeooo:rsid="08294a6b" officeooo:paragraph-rsid="08294a6b" style:font-size-asian="12.25pt" style:font-style-asian="normal" style:font-weight-asian="normal" style:font-name-complex="Carlito" style:font-size-complex="14pt" style:font-style-complex="normal" style:font-weight-complex="normal"/>
    </style:style>
    <style:style style:name="P128" style:family="paragraph" style:parent-style-name="Standard">
      <style:text-properties fo:color="#127622" loext:opacity="100%" style:font-name="Gabriela Nerd Font" officeooo:rsid="04553ef7" officeooo:paragraph-rsid="08294a6b" style:font-name-complex="Carlito"/>
    </style:style>
    <style:style style:name="P129" style:family="paragraph" style:parent-style-name="Table_20_Contents">
      <style:text-properties officeooo:paragraph-rsid="082e4904"/>
    </style:style>
    <style:style style:name="P130" style:family="paragraph" style:parent-style-name="Table_20_Contents">
      <style:text-properties officeooo:paragraph-rsid="082f575f"/>
    </style:style>
    <style:style style:name="P131" style:family="paragraph" style:parent-style-name="Standard" style:list-style-name="L17">
      <style:text-properties officeooo:paragraph-rsid="082d0af2"/>
    </style:style>
    <style:style style:name="P132" style:family="paragraph" style:parent-style-name="Standard">
      <style:paragraph-properties fo:text-align="center" style:justify-single-word="false"/>
      <style:text-properties style:font-name="BlackChancery" fo:font-size="14pt" fo:font-style="normal" fo:font-weight="normal" officeooo:rsid="0910637c" officeooo:paragraph-rsid="0910637c" style:font-size-asian="12.25pt" style:font-style-asian="normal" style:font-weight-asian="normal" style:font-name-complex="Carlito" style:font-size-complex="14pt" style:font-style-complex="normal" style:font-weight-complex="normal"/>
    </style:style>
    <style:style style:name="P133" style:family="paragraph" style:parent-style-name="Standard">
      <style:text-properties fo:color="#127622" loext:opacity="100%" style:font-name="Gabriela Nerd Font" officeooo:rsid="085d02b2" officeooo:paragraph-rsid="082d0af2" style:font-name-complex="Carlito"/>
    </style:style>
    <style:style style:name="P134" style:family="paragraph" style:parent-style-name="Table_20_Contents">
      <style:text-properties fo:color="#ff0000" loext:opacity="100%" officeooo:paragraph-rsid="0910637c"/>
    </style:style>
    <style:style style:name="P135" style:family="paragraph" style:parent-style-name="Standard" style:list-style-name="L18">
      <style:text-properties officeooo:paragraph-rsid="091e8c11"/>
    </style:style>
    <style:style style:name="P136" style:family="paragraph" style:parent-style-name="Standard" style:list-style-name="L18">
      <style:text-properties officeooo:paragraph-rsid="0923c289"/>
    </style:style>
    <style:style style:name="P137" style:family="paragraph" style:parent-style-name="Standard">
      <style:text-properties officeooo:rsid="091e8c11" officeooo:paragraph-rsid="091e8c11"/>
    </style:style>
    <style:style style:name="P138" style:family="paragraph" style:parent-style-name="Standard">
      <style:paragraph-properties fo:text-align="center" style:justify-single-word="false"/>
      <style:text-properties officeooo:paragraph-rsid="03463892"/>
    </style:style>
    <style:style style:name="P139" style:family="paragraph" style:parent-style-name="Standard">
      <style:paragraph-properties fo:text-align="center" style:justify-single-word="false"/>
      <style:text-properties fo:color="#127622" loext:opacity="100%" style:font-name="Gabriela Nerd Font" officeooo:rsid="04553ef7" officeooo:paragraph-rsid="0417ed04" style:font-name-complex="Carlito"/>
    </style:style>
    <style:style style:name="P140" style:family="paragraph" style:parent-style-name="Table_20_Contents">
      <style:paragraph-properties fo:text-align="center" style:justify-single-word="false"/>
      <style:text-properties style:font-name="Carlito" fo:font-size="12pt" officeooo:rsid="00ed9aea" officeooo:paragraph-rsid="00ed9aea" style:font-size-asian="12pt" style:font-name-complex="Carlito" style:font-size-complex="12pt"/>
    </style:style>
    <style:style style:name="P141" style:family="paragraph" style:parent-style-name="Table_20_Contents">
      <style:text-properties style:font-name="Carlito" fo:font-size="12pt" officeooo:paragraph-rsid="00bcf2e7" style:font-size-asian="12pt" style:font-name-complex="Carlito" style:font-size-complex="12pt"/>
    </style:style>
    <style:style style:name="P142" style:family="paragraph" style:parent-style-name="Table_20_Contents">
      <style:text-properties fo:color="#ff0000" loext:opacity="100%" style:font-name="Carlito" fo:font-size="12pt" officeooo:paragraph-rsid="00eba6a2" style:font-size-asian="12pt" style:font-name-complex="Carlito" style:font-size-complex="12pt"/>
    </style:style>
    <style:style style:name="P143" style:family="paragraph" style:parent-style-name="Table_20_Contents">
      <style:text-properties style:font-name="Carlito" fo:font-size="12pt" officeooo:rsid="00eba6a2" officeooo:paragraph-rsid="00eba6a2" style:font-size-asian="12pt" style:font-name-complex="Carlito" style:font-size-complex="12pt"/>
    </style:style>
    <style:style style:name="P144" style:family="paragraph" style:parent-style-name="Table_20_Contents">
      <style:text-properties fo:color="#ff0000" loext:opacity="100%" style:font-name="Carlito" fo:font-size="12pt" officeooo:paragraph-rsid="00ed2452" style:font-size-asian="12pt" style:font-name-complex="Carlito" style:font-size-complex="12pt"/>
    </style:style>
    <style:style style:name="P145" style:family="paragraph" style:parent-style-name="Table_20_Contents">
      <style:text-properties style:font-name="Carlito" fo:font-size="12pt" officeooo:rsid="00ed2452" officeooo:paragraph-rsid="00ed2452" style:font-size-asian="12pt" style:font-name-complex="Carlito" style:font-size-complex="12pt"/>
    </style:style>
    <style:style style:name="P146" style:family="paragraph" style:parent-style-name="Table_20_Contents">
      <style:text-properties fo:color="#ff0000" loext:opacity="100%" style:font-name="Carlito" fo:font-size="12pt" officeooo:paragraph-rsid="00ed2452" fo:background-color="transparent" style:font-size-asian="12pt" style:font-name-complex="Carlito" style:font-size-complex="12pt"/>
    </style:style>
    <style:style style:name="P147" style:family="paragraph" style:parent-style-name="Standard" style:list-style-name="L19">
      <style:text-properties officeooo:paragraph-rsid="0206f3d3"/>
    </style:style>
    <style:style style:name="P148" style:family="paragraph" style:parent-style-name="Standard" style:list-style-name="L19"/>
    <style:style style:name="P149" style:family="paragraph" style:parent-style-name="Standard" style:list-style-name="L19">
      <style:text-properties style:use-window-font-color="true" loext:opacity="0%" style:font-name="Carlito" fo:font-size="12pt" officeooo:rsid="0341c7a7" officeooo:paragraph-rsid="0344dc42" style:font-size-asian="12pt" style:font-name-complex="Carlito" style:font-size-complex="12pt"/>
    </style:style>
    <style:style style:name="P150" style:family="paragraph" style:parent-style-name="Standard" style:list-style-name="L19">
      <style:text-properties officeooo:paragraph-rsid="0865c9c0"/>
    </style:style>
    <style:style style:name="P151" style:family="paragraph" style:parent-style-name="Standard" style:list-style-name="L19">
      <style:text-properties style:font-name="Carlito" fo:font-size="12pt" officeooo:rsid="0866fa18" officeooo:paragraph-rsid="0866fa18" style:font-size-asian="12pt" style:font-name-complex="Carlito" style:font-size-complex="12pt"/>
    </style:style>
    <style:style style:name="P152" style:family="paragraph" style:parent-style-name="Standard">
      <style:text-properties style:font-name="Carlito" fo:font-size="12pt" fo:font-style="normal" officeooo:rsid="0735edc2" officeooo:paragraph-rsid="0865c9c0" style:font-size-asian="12pt" style:font-style-asian="normal" style:font-name-complex="Carlito" style:font-size-complex="12pt" style:font-style-complex="normal"/>
    </style:style>
    <style:style style:name="P153" style:family="paragraph" style:parent-style-name="Standard">
      <style:paragraph-properties fo:text-align="center" style:justify-single-word="false" style:writing-mode="lr-tb"/>
      <style:text-properties style:font-name="BlackChancery" fo:font-size="14pt" officeooo:rsid="04d529f6" officeooo:paragraph-rsid="04d529f6" style:font-size-asian="12.25pt" style:font-name-complex="Carlito" style:font-size-complex="14pt"/>
    </style:style>
    <style:style style:name="P154" style:family="paragraph" style:parent-style-name="Table_20_Contents">
      <style:text-properties officeooo:paragraph-rsid="04d3c6ee"/>
    </style:style>
    <style:style style:name="P155" style:family="paragraph" style:parent-style-name="Standard" style:list-style-name="L20">
      <style:paragraph-properties fo:text-align="left" style:justify-single-word="false" style:writing-mode="lr-tb"/>
      <style:text-properties style:use-window-font-color="true" loext:opacity="0%" style:font-name="Carlito" fo:font-size="12pt" officeooo:rsid="073e2b02" officeooo:paragraph-rsid="073e2b02" style:font-size-asian="12pt" style:font-name-complex="Carlito" style:font-size-complex="12pt"/>
    </style:style>
    <style:style style:name="P156" style:family="paragraph" style:parent-style-name="Standard" style:list-style-name="L20">
      <style:paragraph-properties fo:text-align="left" style:justify-single-word="false" style:writing-mode="lr-tb"/>
      <style:text-properties style:use-window-font-color="true" loext:opacity="0%" style:font-name="Carlito" fo:font-size="12pt" officeooo:rsid="073d478d" officeooo:paragraph-rsid="073d478d" style:font-size-asian="12pt" style:font-name-complex="Carlito" style:font-size-complex="12pt"/>
    </style:style>
    <style:style style:name="P157" style:family="paragraph" style:parent-style-name="Standard" style:list-style-name="L20">
      <style:paragraph-properties fo:text-align="left" style:justify-single-word="false" style:writing-mode="lr-tb"/>
      <style:text-properties style:use-window-font-color="true" loext:opacity="0%" style:font-name="Carlito" fo:font-size="12pt" officeooo:rsid="073fc600" officeooo:paragraph-rsid="073fc600" style:font-size-asian="12pt" style:font-name-complex="Carlito" style:font-size-complex="12pt"/>
    </style:style>
    <style:style style:name="P158" style:family="paragraph" style:parent-style-name="Standard">
      <style:paragraph-properties fo:text-align="center" style:justify-single-word="false" style:writing-mode="lr-tb"/>
      <style:text-properties style:font-name="BlackChancery" fo:font-size="14pt" officeooo:rsid="04bfc3ce" officeooo:paragraph-rsid="08607b53" style:font-size-asian="12.25pt" style:font-name-complex="Carlito" style:font-size-complex="14pt"/>
    </style:style>
    <style:style style:name="P159" style:family="paragraph" style:parent-style-name="Standard">
      <style:paragraph-properties style:writing-mode="lr-tb"/>
      <style:text-properties officeooo:paragraph-rsid="08607b53"/>
    </style:style>
    <style:style style:name="P160" style:family="paragraph" style:parent-style-name="Standard">
      <style:text-properties fo:color="#127622" loext:opacity="100%" style:font-name="Gabriela Nerd Font" officeooo:rsid="04553ef7" officeooo:paragraph-rsid="08607b53" style:font-name-complex="Carlito"/>
    </style:style>
    <style:style style:name="P161" style:family="paragraph" style:parent-style-name="Table_20_Contents">
      <style:text-properties style:font-name="Carlito" officeooo:paragraph-rsid="08607b53" style:font-name-complex="Carlito"/>
    </style:style>
    <style:style style:name="P162" style:family="paragraph" style:parent-style-name="Standard" style:list-style-name="L21">
      <style:paragraph-properties fo:text-align="left" style:justify-single-word="false" style:writing-mode="lr-tb"/>
      <style:text-properties officeooo:rsid="08619aff" officeooo:paragraph-rsid="08619aff"/>
    </style:style>
    <style:style style:name="P163" style:family="paragraph" style:parent-style-name="Standard" style:list-style-name="L21">
      <style:text-properties officeooo:paragraph-rsid="08b933cd"/>
    </style:style>
    <style:style style:name="P164" style:family="paragraph" style:parent-style-name="Standard">
      <style:paragraph-properties fo:text-align="center" style:justify-single-word="false" style:writing-mode="lr-tb"/>
      <style:text-properties style:font-name="BlackChancery" fo:font-size="14pt" fo:font-style="normal" fo:font-weight="normal" officeooo:rsid="06af67a4" officeooo:paragraph-rsid="0745d5a1" style:font-size-asian="12.25pt" style:font-style-asian="normal" style:font-weight-asian="normal" style:font-name-complex="Carlito" style:font-size-complex="14pt" style:font-style-complex="normal" style:font-weight-complex="normal"/>
    </style:style>
    <style:style style:name="P165" style:family="paragraph" style:parent-style-name="Standard">
      <style:paragraph-properties style:writing-mode="lr-tb"/>
      <style:text-properties officeooo:paragraph-rsid="0745d5a1"/>
    </style:style>
    <style:style style:name="P166" style:family="paragraph" style:parent-style-name="Standard">
      <style:text-properties fo:color="#127622" loext:opacity="100%" style:font-name="Gabriela Nerd Font" officeooo:rsid="04553ef7" officeooo:paragraph-rsid="0745d5a1" style:font-name-complex="Carlito"/>
    </style:style>
    <style:style style:name="P167" style:family="paragraph" style:parent-style-name="Table_20_Contents">
      <style:text-properties style:font-name="Carlito" officeooo:paragraph-rsid="0745d5a1" style:font-name-complex="Carlito"/>
    </style:style>
    <style:style style:name="P168" style:family="paragraph" style:parent-style-name="Standard">
      <style:text-properties officeooo:paragraph-rsid="0745d5a1"/>
    </style:style>
    <style:style style:name="P169" style:family="paragraph" style:parent-style-name="Standard" style:list-style-name="L22">
      <style:paragraph-properties fo:text-align="left" style:justify-single-word="false" style:writing-mode="lr-tb"/>
      <style:text-properties officeooo:paragraph-rsid="08726895"/>
    </style:style>
    <style:style style:name="P170" style:family="paragraph" style:parent-style-name="Standard" style:list-style-name="L22">
      <style:paragraph-properties fo:text-align="left" style:justify-single-word="false" style:writing-mode="lr-tb"/>
      <style:text-properties style:use-window-font-color="true" loext:opacity="0%" style:font-name="Carlito" fo:font-size="12pt" officeooo:rsid="0514f029" officeooo:paragraph-rsid="0745d5a1" style:font-size-asian="12pt" style:font-name-complex="Carlito" style:font-size-complex="12pt"/>
    </style:style>
    <style:style style:name="P171" style:family="paragraph" style:parent-style-name="Standard">
      <style:paragraph-properties fo:text-align="center" style:justify-single-word="false"/>
      <style:text-properties style:font-name="BlackChancery" fo:font-size="14pt" officeooo:rsid="050f9557" officeooo:paragraph-rsid="0875a9b6" style:font-size-asian="12.25pt" style:font-size-complex="14pt"/>
    </style:style>
    <style:style style:name="P172" style:family="paragraph" style:parent-style-name="Standard">
      <style:text-properties fo:color="#127622" loext:opacity="100%" style:font-name="Gabriela Nerd Font" officeooo:rsid="04553ef7" officeooo:paragraph-rsid="0875a9b6" style:font-name-complex="Carlito"/>
    </style:style>
    <style:style style:name="P173" style:family="paragraph" style:parent-style-name="Table_20_Contents">
      <style:text-properties style:font-name="Carlito" officeooo:paragraph-rsid="0875a9b6" style:font-name-complex="Carlito"/>
    </style:style>
    <style:style style:name="P174" style:family="paragraph" style:parent-style-name="Table_20_Contents">
      <style:text-properties fo:color="#127622" loext:opacity="100%" style:font-name="Gabriela Nerd Font" fo:font-size="12pt" fo:language="en" fo:country="US" officeooo:rsid="04553ef7" officeooo:paragraph-rsid="0875a9b6" style:letter-kerning="false" style:font-name-asian="DejaVu Sans" style:font-size-asian="12pt" style:language-asian="zh" style:country-asian="CN" style:font-name-complex="Carlito" style:font-size-complex="12pt" style:language-complex="hi" style:country-complex="IN"/>
    </style:style>
    <style:style style:name="P175" style:family="paragraph" style:parent-style-name="Table_20_Contents">
      <style:text-properties fo:color="#b85c00" loext:opacity="100%" officeooo:paragraph-rsid="0875a9b6"/>
    </style:style>
    <style:style style:name="P176" style:family="paragraph" style:parent-style-name="Standard" style:list-style-name="L23">
      <style:paragraph-properties fo:text-align="left" style:justify-single-word="false" style:writing-mode="lr-tb"/>
      <style:text-properties style:font-name="Carlito" officeooo:rsid="03793a68" officeooo:paragraph-rsid="0875a9b6" style:font-name-complex="Carlito"/>
    </style:style>
    <style:style style:name="P177" style:family="paragraph" style:parent-style-name="Standard" style:list-style-name="L23">
      <style:paragraph-properties fo:text-align="left" style:justify-single-word="false" style:writing-mode="lr-tb"/>
      <style:text-properties style:font-name="Carlito" officeooo:rsid="05139565" officeooo:paragraph-rsid="0875a9b6" style:font-name-complex="Carlito"/>
    </style:style>
    <style:style style:name="P178" style:family="paragraph" style:parent-style-name="Standard" style:list-style-name="L23">
      <style:paragraph-properties fo:text-align="left" style:justify-single-word="false" style:writing-mode="lr-tb"/>
      <style:text-properties style:font-name="Carlito" fo:font-size="12pt" officeooo:rsid="037aa1a4" officeooo:paragraph-rsid="0878610b" style:font-size-asian="12pt" style:font-name-complex="Carlito" style:font-size-complex="12pt"/>
    </style:style>
    <style:style style:name="P179" style:family="paragraph" style:parent-style-name="Standard">
      <style:paragraph-properties fo:text-align="center" style:justify-single-word="false" style:writing-mode="lr-tb"/>
      <style:text-properties officeooo:paragraph-rsid="074135cc"/>
    </style:style>
    <style:style style:name="P180" style:family="paragraph" style:parent-style-name="Standard">
      <style:text-properties fo:color="#127622" loext:opacity="100%" style:font-name="Gabriela Nerd Font" officeooo:rsid="04553ef7" officeooo:paragraph-rsid="0206f3d3" style:font-name-complex="Carlito"/>
    </style:style>
    <style:style style:name="P181" style:family="paragraph" style:parent-style-name="Table_20_Contents">
      <style:text-properties officeooo:paragraph-rsid="087feb99"/>
    </style:style>
    <style:style style:name="P182" style:family="paragraph" style:parent-style-name="Table_20_Contents">
      <style:text-properties officeooo:paragraph-rsid="04cbb33e"/>
    </style:style>
    <style:style style:name="P183" style:family="paragraph" style:parent-style-name="Standard" style:list-style-name="L24">
      <style:paragraph-properties fo:text-align="left" style:justify-single-word="false" style:writing-mode="lr-tb"/>
      <style:text-properties style:font-name="Carlito" fo:font-size="12pt" officeooo:rsid="04bf257f" officeooo:paragraph-rsid="04bf257f" style:font-size-asian="12pt" style:font-name-complex="Carlito" style:font-size-complex="12pt"/>
    </style:style>
    <style:style style:name="P184" style:family="paragraph" style:parent-style-name="Standard" style:list-style-name="L24">
      <style:paragraph-properties fo:text-align="left" style:justify-single-word="false" style:writing-mode="lr-tb"/>
      <style:text-properties officeooo:paragraph-rsid="04e83243"/>
    </style:style>
    <style:style style:name="P185" style:family="paragraph" style:parent-style-name="Standard" style:list-style-name="L24">
      <style:paragraph-properties fo:text-align="left" style:justify-single-word="false" style:writing-mode="lr-tb"/>
      <style:text-properties officeooo:paragraph-rsid="04ca2bf4"/>
    </style:style>
    <style:style style:name="P186" style:family="paragraph" style:parent-style-name="Standard" style:list-style-name="L24">
      <style:paragraph-properties fo:text-align="left" style:justify-single-word="false" style:writing-mode="lr-tb"/>
      <style:text-properties officeooo:paragraph-rsid="04c384cd"/>
    </style:style>
    <style:style style:name="P187" style:family="paragraph" style:parent-style-name="Standard" style:list-style-name="L24">
      <style:paragraph-properties fo:text-align="left" style:justify-single-word="false" style:writing-mode="lr-tb"/>
      <style:text-properties officeooo:paragraph-rsid="0788c2db"/>
    </style:style>
    <style:style style:name="P188" style:family="paragraph" style:parent-style-name="Standard" style:list-style-name="L24">
      <style:paragraph-properties fo:text-align="left" style:justify-single-word="false" style:writing-mode="lr-tb"/>
      <style:text-properties style:use-window-font-color="true" loext:opacity="0%" style:font-name="Carlito" fo:font-size="12pt" officeooo:rsid="04c8a9a1" officeooo:paragraph-rsid="04c8a9a1" style:font-size-asian="12pt" style:font-name-complex="Carlito" style:font-size-complex="12pt"/>
    </style:style>
    <style:style style:name="P189" style:family="paragraph" style:parent-style-name="Standard">
      <style:paragraph-properties fo:text-align="center" style:justify-single-word="false" fo:break-before="page" style:writing-mode="lr-tb"/>
      <style:text-properties style:font-name="BlackChancery" fo:font-size="14pt" officeooo:rsid="04fdd024" officeooo:paragraph-rsid="04fdd024" style:font-size-asian="12.25pt" style:font-name-complex="Carlito" style:font-size-complex="14pt"/>
    </style:style>
    <style:style style:name="P190" style:family="paragraph" style:parent-style-name="Standard">
      <style:paragraph-properties fo:text-align="left" style:justify-single-word="false" style:writing-mode="lr-tb"/>
      <style:text-properties officeooo:paragraph-rsid="01367575"/>
    </style:style>
    <style:style style:name="P191" style:family="paragraph" style:parent-style-name="Standard">
      <style:paragraph-properties fo:text-align="left" style:justify-single-word="false" style:writing-mode="lr-tb"/>
      <style:text-properties style:font-name="Carlito" fo:font-size="12pt" officeooo:rsid="0114c042" officeooo:paragraph-rsid="0114c042" style:font-size-asian="12pt" style:font-name-complex="Carlito" style:font-size-complex="12pt"/>
    </style:style>
    <style:style style:name="P192" style:family="paragraph" style:parent-style-name="Table_20_Contents">
      <style:text-properties officeooo:paragraph-rsid="00bcf2e7"/>
    </style:style>
    <style:style style:name="P193" style:family="paragraph" style:parent-style-name="Standard" style:list-style-name="L25">
      <style:paragraph-properties fo:text-align="left" style:justify-single-word="false" style:writing-mode="lr-tb"/>
      <style:text-properties style:font-name="Carlito" fo:font-size="12pt" officeooo:rsid="005e3d46" officeooo:paragraph-rsid="00bcf2e7" style:font-size-asian="12pt" style:font-name-complex="Carlito" style:font-size-complex="12pt"/>
    </style:style>
    <style:style style:name="P194" style:family="paragraph" style:parent-style-name="Standard" style:list-style-name="L25">
      <style:paragraph-properties fo:text-align="left" style:justify-single-word="false" style:writing-mode="lr-tb"/>
      <style:text-properties officeooo:paragraph-rsid="022d4502"/>
    </style:style>
    <style:style style:name="P195" style:family="paragraph" style:parent-style-name="Standard" style:list-style-name="L25">
      <style:paragraph-properties fo:text-align="left" style:justify-single-word="false" style:writing-mode="lr-tb"/>
      <style:text-properties officeooo:paragraph-rsid="01165017"/>
    </style:style>
    <style:style style:name="P196" style:family="paragraph" style:parent-style-name="Standard">
      <style:paragraph-properties fo:text-align="left" style:justify-single-word="false" style:writing-mode="lr-tb"/>
      <style:text-properties style:font-name="Carlito" fo:font-size="12pt" officeooo:rsid="005e3d46" officeooo:paragraph-rsid="00bcf2e7" style:font-size-asian="12pt" style:font-name-complex="Carlito" style:font-size-complex="12pt"/>
    </style:style>
    <style:style style:name="P197" style:family="paragraph" style:parent-style-name="Standard" style:list-style-name="L26">
      <style:paragraph-properties fo:text-align="left" style:justify-single-word="false" style:writing-mode="lr-tb"/>
      <style:text-properties style:font-name="Carlito" fo:font-size="12pt" officeooo:rsid="005c2f36" officeooo:paragraph-rsid="0118fae7" style:font-size-asian="12pt" style:font-name-complex="Carlito" style:font-size-complex="12pt"/>
    </style:style>
    <style:style style:name="P198" style:family="paragraph" style:parent-style-name="Standard" style:list-style-name="L26">
      <style:paragraph-properties fo:text-align="left" style:justify-single-word="false" style:writing-mode="lr-tb"/>
      <style:text-properties officeooo:paragraph-rsid="08883a01"/>
    </style:style>
    <style:style style:name="P199" style:family="paragraph" style:parent-style-name="Standard">
      <style:paragraph-properties fo:text-align="left" style:justify-single-word="false" style:writing-mode="lr-tb"/>
      <style:text-properties style:font-name="Carlito" fo:font-size="12pt" officeooo:rsid="005c2f36" officeooo:paragraph-rsid="00bcf2e7" style:font-size-asian="12pt" style:font-name-complex="Carlito" style:font-size-complex="12pt"/>
    </style:style>
    <style:style style:name="P200" style:family="paragraph" style:parent-style-name="Table_20_Contents">
      <style:text-properties officeooo:paragraph-rsid="01276cbb"/>
    </style:style>
    <style:style style:name="P201" style:family="paragraph" style:parent-style-name="Standard" style:list-style-name="L27">
      <style:paragraph-properties fo:text-align="left" style:justify-single-word="false" style:writing-mode="lr-tb"/>
      <style:text-properties officeooo:paragraph-rsid="0140e6b2"/>
    </style:style>
    <style:style style:name="P202" style:family="paragraph" style:parent-style-name="Standard">
      <style:paragraph-properties fo:text-align="center" style:justify-single-word="false"/>
      <style:text-properties style:font-name="BlackChancery" fo:font-size="14pt" officeooo:rsid="04fee4a8" officeooo:paragraph-rsid="04fee4a8" style:font-size-asian="12.25pt" style:font-size-complex="14pt"/>
    </style:style>
    <style:style style:name="P203" style:family="paragraph" style:parent-style-name="Table_20_Contents">
      <style:text-properties officeooo:paragraph-rsid="00c208bb"/>
    </style:style>
    <style:style style:name="P204" style:family="paragraph" style:parent-style-name="Standard" style:list-style-name="L28">
      <style:paragraph-properties fo:text-align="left" style:justify-single-word="false" style:writing-mode="lr-tb"/>
      <style:text-properties style:font-name="Carlito" fo:font-size="12pt" officeooo:rsid="0061bc4c" officeooo:paragraph-rsid="00c208bb" style:font-size-asian="12pt" style:font-name-complex="Carlito" style:font-size-complex="12pt"/>
    </style:style>
    <style:style style:name="P205" style:family="paragraph" style:parent-style-name="Standard" style:list-style-name="L28">
      <style:paragraph-properties fo:text-align="left" style:justify-single-word="false" style:writing-mode="lr-tb"/>
      <style:text-properties style:font-name="Carlito" fo:font-size="12pt" officeooo:rsid="02014e11" officeooo:paragraph-rsid="02014e11" style:font-size-asian="12pt" style:font-name-complex="Carlito" style:font-size-complex="12pt"/>
    </style:style>
    <style:style style:name="P206" style:family="paragraph" style:parent-style-name="Standard" style:list-style-name="L28">
      <style:paragraph-properties fo:text-align="left" style:justify-single-word="false" style:writing-mode="lr-tb"/>
      <style:text-properties style:font-name="Carlito" fo:font-size="12pt" officeooo:rsid="011e2bad" officeooo:paragraph-rsid="011e2bad" style:font-size-asian="12pt" style:font-name-complex="Carlito" style:font-size-complex="12pt"/>
    </style:style>
    <style:style style:name="P207" style:family="paragraph" style:parent-style-name="Standard">
      <style:paragraph-properties fo:text-align="left" style:justify-single-word="false" style:writing-mode="lr-tb"/>
      <style:text-properties style:font-name="Carlito" fo:font-size="12pt" officeooo:paragraph-rsid="00bcf2e7" style:font-size-asian="12pt" style:font-name-complex="Carlito" style:font-size-complex="12pt"/>
    </style:style>
    <style:style style:name="P208" style:family="paragraph" style:parent-style-name="Standard">
      <style:paragraph-properties fo:text-align="center" style:justify-single-word="false" style:writing-mode="lr-tb"/>
      <style:text-properties style:font-name="BlackChancery" fo:font-size="14pt" fo:font-weight="normal" officeooo:rsid="050234e9" officeooo:paragraph-rsid="050234e9" style:font-size-asian="12.25pt" style:font-weight-asian="normal" style:font-name-complex="Carlito" style:font-size-complex="14pt" style:font-weight-complex="normal"/>
    </style:style>
    <style:style style:name="P209" style:family="paragraph" style:parent-style-name="Table_20_Contents">
      <style:text-properties officeooo:paragraph-rsid="024e37fc"/>
    </style:style>
    <style:style style:name="P210" style:family="paragraph" style:parent-style-name="Standard" style:list-style-name="L29">
      <style:paragraph-properties fo:text-align="left" style:justify-single-word="false" style:writing-mode="lr-tb"/>
      <style:text-properties style:font-name="Carlito" fo:font-size="12pt" officeooo:rsid="025643ef" officeooo:paragraph-rsid="025643ef" style:font-size-asian="12pt" style:font-name-complex="Carlito" style:font-size-complex="12pt"/>
    </style:style>
    <style:style style:name="P211" style:family="paragraph" style:parent-style-name="Standard" style:list-style-name="L29">
      <style:paragraph-properties fo:text-align="left" style:justify-single-word="false" style:writing-mode="lr-tb"/>
      <style:text-properties style:font-name="Carlito" fo:font-size="12pt" fo:font-weight="normal" officeooo:rsid="0257e48d" officeooo:paragraph-rsid="0257e48d" style:font-size-asian="12pt" style:font-weight-asian="normal" style:font-name-complex="Carlito" style:font-size-complex="12pt" style:font-weight-complex="normal"/>
    </style:style>
    <style:style style:name="P212" style:family="paragraph" style:parent-style-name="Standard" style:list-style-name="L29">
      <style:paragraph-properties fo:text-align="left" style:justify-single-word="false" style:writing-mode="lr-tb"/>
      <style:text-properties officeooo:paragraph-rsid="02518218"/>
    </style:style>
    <style:style style:name="P213" style:family="paragraph" style:parent-style-name="Standard">
      <style:paragraph-properties fo:text-align="left" style:justify-single-word="false" style:writing-mode="lr-tb"/>
      <style:text-properties style:font-name="Carlito" fo:font-size="12pt" fo:font-weight="normal" officeooo:rsid="02591608" officeooo:paragraph-rsid="02518218" style:font-size-asian="12pt" style:font-weight-asian="normal" style:font-name-complex="Carlito" style:font-size-complex="12pt" style:font-weight-complex="normal"/>
    </style:style>
    <style:style style:name="P214" style:family="paragraph" style:parent-style-name="Standard">
      <style:paragraph-properties fo:text-align="center" style:justify-single-word="false" style:writing-mode="lr-tb"/>
      <style:text-properties style:font-name="BlackChancery" fo:font-size="14pt" officeooo:rsid="05037fa9" officeooo:paragraph-rsid="05037fa9" style:font-size-asian="12.25pt" style:font-name-complex="Carlito" style:font-size-complex="14pt"/>
    </style:style>
    <style:style style:name="P215" style:family="paragraph" style:parent-style-name="Standard" style:list-style-name="L30">
      <style:paragraph-properties fo:text-align="left" style:justify-single-word="false" style:writing-mode="lr-tb"/>
      <style:text-properties style:font-name="Carlito" fo:font-size="12pt" fo:font-weight="normal" officeooo:rsid="06940156" officeooo:paragraph-rsid="06940156" style:font-size-asian="12pt" style:font-weight-asian="normal" style:font-name-complex="Carlito" style:font-size-complex="12pt" style:font-weight-complex="normal"/>
    </style:style>
    <style:style style:name="P216" style:family="paragraph" style:parent-style-name="Standard" style:list-style-name="L30">
      <style:paragraph-properties fo:text-align="left" style:justify-single-word="false" style:writing-mode="lr-tb"/>
      <style:text-properties style:font-name="Carlito" fo:font-size="12pt" fo:font-style="normal" fo:font-weight="normal" officeooo:rsid="06940156" officeooo:paragraph-rsid="06940156" style:font-size-asian="12pt" style:font-style-asian="normal" style:font-weight-asian="normal" style:font-name-complex="Carlito" style:font-size-complex="12pt" style:font-style-complex="normal" style:font-weight-complex="normal"/>
    </style:style>
    <style:style style:name="P217" style:family="paragraph" style:parent-style-name="Standard" style:list-style-name="L30">
      <style:paragraph-properties fo:text-align="left" style:justify-single-word="false" style:writing-mode="lr-tb"/>
      <style:text-properties style:font-name="Carlito" fo:font-size="12pt" officeooo:rsid="02e5baa5" officeooo:paragraph-rsid="02e5baa5" style:font-size-asian="12pt" style:font-name-complex="Carlito" style:font-size-complex="12pt"/>
    </style:style>
    <style:style style:name="P218" style:family="paragraph" style:parent-style-name="Standard">
      <style:paragraph-properties fo:text-align="center" style:justify-single-word="false" style:writing-mode="lr-tb"/>
      <style:text-properties officeooo:rsid="09408f49" officeooo:paragraph-rsid="09408f49"/>
    </style:style>
    <style:style style:name="P219" style:family="paragraph" style:parent-style-name="Standard">
      <style:paragraph-properties style:writing-mode="lr-tb"/>
      <style:text-properties officeooo:paragraph-rsid="08182c7c"/>
    </style:style>
    <style:style style:name="P220" style:family="paragraph" style:parent-style-name="Standard">
      <style:text-properties fo:color="#127622" loext:opacity="100%" style:font-name="Gabriela Nerd Font" officeooo:rsid="04553ef7" officeooo:paragraph-rsid="08182c7c" style:font-name-complex="Carlito"/>
    </style:style>
    <style:style style:name="P221" style:family="paragraph" style:parent-style-name="Table_20_Contents">
      <style:text-properties style:font-name="Carlito" officeooo:paragraph-rsid="08182c7c" style:font-name-complex="Carlito"/>
    </style:style>
    <style:style style:name="P222" style:family="paragraph" style:parent-style-name="Table_20_Contents">
      <style:text-properties fo:color="#ff0000" loext:opacity="100%" style:font-name="Carlito" officeooo:paragraph-rsid="08182c7c" style:font-name-complex="Carlito"/>
    </style:style>
    <style:style style:name="P223" style:family="paragraph" style:parent-style-name="Table_20_Contents">
      <style:text-properties officeooo:paragraph-rsid="08182c7c"/>
    </style:style>
    <style:style style:name="P224" style:family="paragraph" style:parent-style-name="Standard" style:list-style-name="L9">
      <style:paragraph-properties fo:text-align="left" style:justify-single-word="false" style:writing-mode="lr-tb"/>
      <style:text-properties officeooo:paragraph-rsid="08182c7c"/>
    </style:style>
    <style:style style:name="P225" style:family="paragraph" style:parent-style-name="Standard">
      <style:paragraph-properties fo:text-align="center" style:justify-single-word="false" style:writing-mode="lr-tb"/>
      <style:text-properties officeooo:rsid="0943227f" officeooo:paragraph-rsid="0943227f"/>
    </style:style>
    <style:style style:name="P226" style:family="paragraph" style:parent-style-name="Standard" style:list-style-name="L9">
      <style:paragraph-properties fo:text-align="left" style:justify-single-word="false" style:writing-mode="lr-tb"/>
      <style:text-properties officeooo:paragraph-rsid="089a5e89"/>
    </style:style>
    <style:style style:name="P227" style:family="paragraph" style:parent-style-name="Standard" style:list-style-name="L9">
      <style:paragraph-properties fo:text-align="left" style:justify-single-word="false" style:writing-mode="lr-tb"/>
      <style:text-properties officeooo:paragraph-rsid="089bfce0"/>
    </style:style>
    <style:style style:name="P228" style:family="paragraph" style:parent-style-name="Standard" style:list-style-name="L9">
      <style:paragraph-properties fo:text-align="left" style:justify-single-word="false" style:writing-mode="lr-tb"/>
      <style:text-properties style:use-window-font-color="true" loext:opacity="0%" style:font-name="Carlito" fo:font-size="12pt" fo:font-style="normal" style:text-underline-style="none" fo:font-weight="normal" officeooo:rsid="089905f9" officeooo:paragraph-rsid="089bdb1c" style:font-size-asian="12pt" style:font-style-asian="normal" style:font-weight-asian="normal" style:font-name-complex="Carlito" style:font-size-complex="12pt" style:font-style-complex="normal" style:font-weight-complex="normal"/>
    </style:style>
    <style:style style:name="P229" style:family="paragraph" style:parent-style-name="Standard" style:list-style-name="L9">
      <style:paragraph-properties fo:text-align="left" style:justify-single-word="false" style:writing-mode="lr-tb"/>
      <style:text-properties officeooo:paragraph-rsid="089905f9"/>
    </style:style>
    <style:style style:name="P230" style:family="paragraph" style:parent-style-name="Standard">
      <style:paragraph-properties fo:text-align="center" style:justify-single-word="false" style:writing-mode="lr-tb"/>
      <style:text-properties officeooo:paragraph-rsid="05395878"/>
    </style:style>
    <style:style style:name="P231" style:family="paragraph" style:parent-style-name="Standard">
      <style:paragraph-properties fo:text-align="center" style:justify-single-word="false" style:writing-mode="lr-tb"/>
      <style:text-properties style:font-name="BlackChancery" fo:font-size="14pt" officeooo:rsid="0504a35e" officeooo:paragraph-rsid="0504a35e" style:font-size-asian="12.25pt" style:font-name-complex="Carlito" style:font-size-complex="14pt"/>
    </style:style>
    <style:style style:name="P232" style:family="paragraph" style:parent-style-name="Standard">
      <style:text-properties fo:color="#127622" loext:opacity="100%" style:font-name="Gabriela Nerd Font" officeooo:rsid="04553ef7" officeooo:paragraph-rsid="00bcf2e7" style:font-name-complex="Carlito"/>
    </style:style>
    <style:style style:name="P233" style:family="paragraph" style:parent-style-name="Table_20_Contents">
      <style:text-properties officeooo:paragraph-rsid="02ce83bc"/>
    </style:style>
    <style:style style:name="P234" style:family="paragraph" style:parent-style-name="Table_20_Contents">
      <style:text-properties officeooo:paragraph-rsid="028c9c94"/>
    </style:style>
    <style:style style:name="P235" style:family="paragraph" style:parent-style-name="Standard" style:list-style-name="L31">
      <style:paragraph-properties fo:text-align="left" style:justify-single-word="false" style:writing-mode="lr-tb"/>
      <style:text-properties officeooo:paragraph-rsid="02d0fb0a"/>
    </style:style>
    <style:style style:name="P236" style:family="paragraph" style:parent-style-name="Standard" style:list-style-name="L31">
      <style:paragraph-properties fo:text-align="left" style:justify-single-word="false" style:writing-mode="lr-tb"/>
      <style:text-properties style:font-name="Carlito" fo:font-size="12pt" officeooo:rsid="0508625c" officeooo:paragraph-rsid="0508625c" style:font-size-asian="12pt" style:font-name-complex="Carlito" style:font-size-complex="12pt"/>
    </style:style>
    <style:style style:name="P237" style:family="paragraph" style:parent-style-name="Standard" style:list-style-name="L31">
      <style:paragraph-properties fo:text-align="left" style:justify-single-word="false" style:writing-mode="lr-tb"/>
      <style:text-properties style:font-name="Carlito" fo:font-size="12pt" fo:font-style="normal" fo:font-weight="normal" officeooo:rsid="089da75c" officeooo:paragraph-rsid="089da75c" style:font-size-asian="12pt" style:font-style-asian="normal" style:font-weight-asian="normal" style:font-name-complex="Carlito" style:font-size-complex="12pt" style:font-style-complex="normal" style:font-weight-complex="normal"/>
    </style:style>
    <style:style style:name="P238" style:family="paragraph" style:parent-style-name="Standard">
      <style:paragraph-properties fo:text-align="center" style:justify-single-word="false" style:writing-mode="lr-tb"/>
      <style:text-properties style:font-name="BlackChancery" fo:font-size="14pt" fo:font-weight="normal" officeooo:rsid="0549898a" officeooo:paragraph-rsid="0549898a" style:font-size-asian="12.25pt" style:font-weight-asian="normal" style:font-name-complex="Carlito" style:font-size-complex="14pt" style:font-weight-complex="normal"/>
    </style:style>
    <style:style style:name="P239" style:family="paragraph" style:parent-style-name="Table_20_Contents">
      <style:text-properties officeooo:paragraph-rsid="028db45d"/>
    </style:style>
    <style:style style:name="P240" style:family="paragraph" style:parent-style-name="Standard" style:list-style-name="L32">
      <style:paragraph-properties fo:text-align="left" style:justify-single-word="false" style:writing-mode="lr-tb"/>
      <style:text-properties style:font-name="Carlito" fo:font-size="12pt" officeooo:rsid="036be035" officeooo:paragraph-rsid="036be035" style:font-size-asian="12pt" style:font-name-complex="Carlito" style:font-size-complex="12pt"/>
    </style:style>
    <style:style style:name="P241" style:family="paragraph" style:parent-style-name="Standard" style:list-style-name="L32">
      <style:paragraph-properties fo:text-align="left" style:justify-single-word="false" style:writing-mode="lr-tb"/>
      <style:text-properties style:font-name="Carlito" fo:font-size="12pt" fo:font-weight="normal" officeooo:rsid="08fe98b3" officeooo:paragraph-rsid="08fe98b3" style:font-size-asian="12pt" style:font-weight-asian="normal" style:font-name-complex="Carlito" style:font-size-complex="12pt" style:font-weight-complex="normal"/>
    </style:style>
    <style:style style:name="P242" style:family="paragraph" style:parent-style-name="Standard" style:list-style-name="L32">
      <style:paragraph-properties fo:text-align="left" style:justify-single-word="false" style:writing-mode="lr-tb"/>
      <style:text-properties officeooo:paragraph-rsid="050cc977"/>
    </style:style>
    <style:style style:name="P243" style:family="paragraph" style:parent-style-name="Standard">
      <style:paragraph-properties fo:text-align="left" style:justify-single-word="false" style:writing-mode="lr-tb"/>
      <style:text-properties style:font-name="Carlito" fo:font-size="12pt" fo:font-style="normal" fo:font-weight="normal" officeooo:rsid="028ea079" officeooo:paragraph-rsid="024e37fc" style:font-size-asian="12pt" style:font-style-asian="normal" style:font-weight-asian="normal" style:font-name-complex="Carlito" style:font-size-complex="12pt" style:font-style-complex="normal" style:font-weight-complex="normal"/>
    </style:style>
    <style:style style:name="P244" style:family="paragraph" style:parent-style-name="Standard">
      <style:paragraph-properties fo:text-align="left" style:justify-single-word="false" style:writing-mode="lr-tb"/>
      <style:text-properties officeooo:paragraph-rsid="024e37fc"/>
    </style:style>
    <style:style style:name="P245" style:family="paragraph" style:parent-style-name="Standard">
      <style:paragraph-properties fo:text-align="center" style:justify-single-word="false" style:writing-mode="lr-tb"/>
      <style:text-properties officeooo:paragraph-rsid="08eb58e4"/>
    </style:style>
    <style:style style:name="P246" style:family="paragraph" style:parent-style-name="Standard">
      <style:paragraph-properties fo:text-align="center" style:justify-single-word="false" style:writing-mode="lr-tb"/>
      <style:text-properties style:font-name="BlackChancery" fo:font-size="14pt" fo:font-weight="normal" officeooo:rsid="0549898a" officeooo:paragraph-rsid="08eb58e4" style:font-size-asian="12.25pt" style:font-weight-asian="normal" style:font-name-complex="Carlito" style:font-size-complex="14pt" style:font-weight-complex="normal"/>
    </style:style>
    <style:style style:name="P247" style:family="paragraph" style:parent-style-name="Table_20_Contents">
      <style:text-properties officeooo:paragraph-rsid="08eb58e4"/>
    </style:style>
    <style:style style:name="P248" style:family="paragraph" style:parent-style-name="Standard" style:list-style-name="L32">
      <style:paragraph-properties fo:text-align="left" style:justify-single-word="false" style:writing-mode="lr-tb"/>
      <style:text-properties officeooo:rsid="08ec68d7" officeooo:paragraph-rsid="08ed9d26"/>
    </style:style>
    <style:style style:name="P249" style:family="paragraph" style:parent-style-name="Standard" style:list-style-name="L32">
      <style:paragraph-properties fo:text-align="left" style:justify-single-word="false" style:writing-mode="lr-tb"/>
      <style:text-properties style:font-name="Carlito" fo:font-size="12pt" fo:font-weight="normal" officeooo:rsid="08ed03d4" officeooo:paragraph-rsid="08ed9d26" style:font-size-asian="12pt" style:font-weight-asian="normal" style:font-name-complex="Carlito" style:font-size-complex="12pt" style:font-weight-complex="normal"/>
    </style:style>
    <style:style style:name="P250" style:family="paragraph" style:parent-style-name="Standard">
      <style:paragraph-properties fo:text-align="left" style:justify-single-word="false" style:writing-mode="lr-tb"/>
      <style:text-properties style:font-name="Carlito" fo:font-size="12pt" fo:font-style="normal" fo:font-weight="normal" officeooo:rsid="028ea079" officeooo:paragraph-rsid="08eb58e4" style:font-size-asian="12pt" style:font-style-asian="normal" style:font-weight-asian="normal" style:font-name-complex="Carlito" style:font-size-complex="12pt" style:font-style-complex="normal" style:font-weight-complex="normal"/>
    </style:style>
    <style:style style:name="P251" style:family="paragraph" style:parent-style-name="Standard">
      <style:paragraph-properties fo:text-align="center" style:justify-single-word="false" style:writing-mode="lr-tb"/>
      <style:text-properties style:font-name="BlackChancery" fo:font-size="14pt" officeooo:rsid="0901e63f" officeooo:paragraph-rsid="0901e63f" style:font-size-asian="12.25pt" style:font-size-complex="14pt"/>
    </style:style>
    <style:style style:name="P252"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127622" loext:opacity="100%" style:font-name="Gabriela Nerd Font" fo:font-size="12pt" fo:language="en" fo:country="US" officeooo:rsid="04553ef7" officeooo:paragraph-rsid="08eb58e4"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53" style:family="paragraph" style:parent-style-name="Table_20_Contents">
      <style:text-properties officeooo:paragraph-rsid="08ed9d26"/>
    </style:style>
    <style:style style:name="P254" style:family="paragraph" style:parent-style-name="Standard" style:list-style-name="L33">
      <style:paragraph-properties fo:text-align="left" style:justify-single-word="false" style:writing-mode="lr-tb"/>
      <style:text-properties officeooo:rsid="08ed9d26" officeooo:paragraph-rsid="08ed9d26"/>
    </style:style>
    <style:style style:name="P255" style:family="paragraph" style:parent-style-name="Standard">
      <style:paragraph-properties fo:text-align="center" style:justify-single-word="false"/>
      <style:text-properties officeooo:paragraph-rsid="052a0d26"/>
    </style:style>
    <style:style style:name="P256" style:family="paragraph" style:parent-style-name="Table_20_Contents">
      <style:text-properties officeooo:paragraph-rsid="02e3224c"/>
    </style:style>
    <style:style style:name="P257" style:family="paragraph" style:parent-style-name="Table_20_Contents">
      <style:text-properties style:font-name="Carlito" officeooo:paragraph-rsid="02e3224c" style:font-name-complex="Carlito"/>
    </style:style>
    <style:style style:name="P258" style:family="paragraph" style:parent-style-name="Standard" style:list-style-name="L34"/>
    <style:style style:name="P259" style:family="paragraph" style:parent-style-name="Standard" style:list-style-name="L34">
      <style:text-properties officeooo:paragraph-rsid="08ce89e8"/>
    </style:style>
    <style:style style:name="P260" style:family="paragraph" style:parent-style-name="Standard" style:list-style-name="L34">
      <style:text-properties officeooo:paragraph-rsid="0558410b"/>
    </style:style>
    <style:style style:name="P261" style:family="paragraph" style:parent-style-name="Standard" style:list-style-name="L34">
      <style:text-properties officeooo:rsid="0589faf4" officeooo:paragraph-rsid="059eb124"/>
    </style:style>
    <style:style style:name="P262" style:family="paragraph" style:parent-style-name="Standard" style:list-style-name="L34">
      <style:text-properties officeooo:paragraph-rsid="059eb124"/>
    </style:style>
    <style:style style:name="P263" style:family="paragraph" style:parent-style-name="Standard" style:list-style-name="L34">
      <style:text-properties officeooo:rsid="058fc64b" officeooo:paragraph-rsid="058fc64b"/>
    </style:style>
    <style:style style:name="P264" style:family="paragraph" style:parent-style-name="Standard" style:list-style-name="L34">
      <style:text-properties officeooo:paragraph-rsid="058fc64b"/>
    </style:style>
    <style:style style:name="P265" style:family="paragraph" style:parent-style-name="Standard" style:list-style-name="L34">
      <style:text-properties officeooo:paragraph-rsid="058a0c8d"/>
    </style:style>
    <style:style style:name="P266" style:family="paragraph" style:parent-style-name="Standard" style:list-style-name="L34">
      <style:text-properties officeooo:paragraph-rsid="08a7f57f"/>
    </style:style>
    <style:style style:name="P267" style:family="paragraph" style:parent-style-name="Standard" style:list-style-name="L34">
      <style:text-properties officeooo:paragraph-rsid="08aa4f27"/>
    </style:style>
    <style:style style:name="P268" style:family="paragraph" style:parent-style-name="Standard" style:list-style-name="L34">
      <style:text-properties officeooo:paragraph-rsid="05ba7f62"/>
    </style:style>
    <style:style style:name="P269" style:family="paragraph" style:parent-style-name="Standard" style:list-style-name="L34">
      <style:text-properties officeooo:paragraph-rsid="05983ad6"/>
    </style:style>
    <style:style style:name="P270" style:family="paragraph" style:parent-style-name="Standard" style:list-style-name="L34">
      <style:text-properties officeooo:paragraph-rsid="0952ecca"/>
    </style:style>
    <style:style style:name="P271" style:family="paragraph" style:parent-style-name="Standard" style:list-style-name="L34">
      <style:text-properties officeooo:paragraph-rsid="0589faf4"/>
    </style:style>
    <style:style style:name="P272" style:family="paragraph" style:parent-style-name="Standard" style:list-style-name="L34">
      <style:text-properties officeooo:rsid="0559c127" officeooo:paragraph-rsid="08af0c66"/>
    </style:style>
    <style:style style:name="P273" style:family="paragraph" style:parent-style-name="Standard" style:list-style-name="L34">
      <style:text-properties officeooo:paragraph-rsid="08b22202"/>
    </style:style>
    <style:style style:name="P274" style:family="paragraph" style:parent-style-name="Standard" style:list-style-name="L34">
      <style:text-properties officeooo:paragraph-rsid="08de3867"/>
    </style:style>
    <style:style style:name="P275" style:family="paragraph" style:parent-style-name="Standard" style:list-style-name="L9">
      <style:paragraph-properties fo:text-align="left" style:justify-single-word="false" style:writing-mode="lr-tb"/>
      <style:text-properties style:use-window-font-color="true" loext:opacity="0%" style:font-name="Liberation Sans1" fo:font-size="14pt" fo:font-style="normal" style:text-underline-style="none" fo:font-weight="normal" officeooo:rsid="08d0d916" officeooo:paragraph-rsid="03db8c4f" style:font-size-asian="14pt" style:font-style-asian="normal" style:font-weight-asian="normal" style:font-name-complex="Carlito" style:font-size-complex="14pt" style:font-style-complex="normal" style:font-weight-complex="normal"/>
    </style:style>
    <style:style style:name="P276" style:family="paragraph" style:parent-style-name="Standard">
      <style:paragraph-properties fo:text-align="left" style:justify-single-word="false" style:writing-mode="lr-tb"/>
      <style:text-properties style:use-window-font-color="true" loext:opacity="0%" style:font-name="Liberation Sans1" fo:font-size="14pt" fo:font-style="normal" style:text-underline-style="none" fo:font-weight="normal" officeooo:rsid="08d0d916" officeooo:paragraph-rsid="03db8c4f" style:font-size-asian="14pt" style:font-style-asian="normal" style:font-weight-asian="normal" style:font-name-complex="Carlito" style:font-size-complex="14pt" style:font-style-complex="normal" style:font-weight-complex="normal"/>
    </style:style>
    <style:style style:name="P277" style:family="paragraph" style:parent-style-name="Standard">
      <style:paragraph-properties fo:text-align="left" style:justify-single-word="false" style:writing-mode="lr-tb"/>
      <style:text-properties fo:font-size="12pt" officeooo:paragraph-rsid="03db8c4f" style:font-size-asian="12pt" style:font-size-complex="12pt"/>
    </style:style>
    <style:style style:name="P278" style:family="paragraph" style:parent-style-name="Standard">
      <style:paragraph-properties fo:text-align="left" style:justify-single-word="false" style:writing-mode="lr-tb"/>
      <style:text-properties style:use-window-font-color="true" loext:opacity="0%" style:font-name="Liberation Sans1" fo:font-size="12pt" fo:font-style="normal" style:text-underline-style="none" fo:font-weight="normal" officeooo:rsid="03d2fcdd" officeooo:paragraph-rsid="03db8c4f" style:font-size-asian="12pt" style:font-style-asian="normal" style:font-weight-asian="normal" style:font-name-complex="Carlito" style:font-size-complex="12pt" style:font-style-complex="normal" style:font-weight-complex="normal"/>
    </style:style>
    <style:style style:name="P279" style:family="paragraph" style:parent-style-name="Standard" style:list-style-name="L35">
      <style:paragraph-properties fo:text-align="left" style:justify-single-word="false" style:writing-mode="lr-tb"/>
      <style:text-properties officeooo:paragraph-rsid="08eff316"/>
    </style:style>
    <style:style style:name="P280"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433f5" officeooo:paragraph-rsid="03db8c4f" style:font-size-asian="12pt" style:font-style-asian="normal" style:font-weight-asian="normal" style:font-name-complex="Carlito" style:font-size-complex="12pt" style:font-style-complex="normal" style:font-weight-complex="normal"/>
    </style:style>
    <style:style style:name="P281"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8da0f7d" officeooo:paragraph-rsid="08da277c" style:font-size-asian="12pt" style:font-style-asian="normal" style:font-weight-asian="normal" style:font-name-complex="Carlito" style:font-size-complex="12pt" style:font-style-complex="normal" style:font-weight-complex="normal"/>
    </style:style>
    <style:style style:name="P282"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2fcdd" officeooo:paragraph-rsid="03db8c4f" style:font-size-asian="12pt" style:font-style-asian="normal" style:font-weight-asian="normal" style:font-name-complex="Carlito" style:font-size-complex="12pt" style:font-style-complex="normal" style:font-weight-complex="normal"/>
    </style:style>
    <style:style style:name="P283" style:family="paragraph" style:parent-style-name="Standard" style:list-style-name="L35">
      <style:paragraph-properties fo:text-align="left" style:justify-single-word="false" style:writing-mode="lr-tb"/>
      <style:text-properties officeooo:paragraph-rsid="03db8c4f"/>
    </style:style>
    <style:style style:name="P284"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8e47d4e" officeooo:paragraph-rsid="08e47d4e" style:font-size-asian="12pt" style:font-style-asian="normal" style:font-weight-asian="normal" style:font-name-complex="Carlito" style:font-size-complex="12pt" style:font-style-complex="normal" style:font-weight-complex="normal"/>
    </style:style>
    <style:style style:name="P285"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32579" officeooo:paragraph-rsid="03db8c4f" style:font-size-asian="12pt" style:font-style-asian="normal" style:font-weight-asian="normal" style:font-name-complex="Carlito" style:font-size-complex="12pt" style:font-style-complex="normal" style:font-weight-complex="normal"/>
    </style:style>
    <style:style style:name="P286"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8cf87a1" officeooo:paragraph-rsid="08cf87a1" style:font-size-asian="12pt" style:font-style-asian="normal" style:font-weight-asian="normal" style:font-name-complex="Carlito" style:font-size-complex="12pt" style:font-style-complex="normal" style:font-weight-complex="normal"/>
    </style:style>
    <style:style style:name="P287" style:family="paragraph" style:parent-style-name="Standard" style:list-style-name="L35">
      <style:paragraph-properties fo:text-align="left" style:justify-single-word="false" style:writing-mode="lr-tb"/>
      <style:text-properties officeooo:paragraph-rsid="08d191e5"/>
    </style:style>
    <style:style style:name="P288"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85472" officeooo:paragraph-rsid="03db8c4f" style:font-size-asian="12pt" style:font-style-asian="normal" style:font-weight-asian="normal" style:font-name-complex="Carlito" style:font-size-complex="12pt" style:font-style-complex="normal" style:font-weight-complex="normal"/>
    </style:style>
    <style:style style:name="P289"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a40aa" officeooo:paragraph-rsid="03db8c4f" style:font-size-asian="12pt" style:font-style-asian="normal" style:font-weight-asian="normal" style:font-name-complex="Carlito" style:font-size-complex="12pt" style:font-style-complex="normal" style:font-weight-complex="normal"/>
    </style:style>
    <style:style style:name="P290"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8f8f14d" officeooo:paragraph-rsid="08f8f14d" style:font-size-asian="12pt" style:font-style-asian="normal" style:font-weight-asian="normal" style:font-name-complex="Carlito" style:font-size-complex="12pt" style:font-style-complex="normal" style:font-weight-complex="normal"/>
    </style:style>
    <style:style style:name="P291"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904c81c" officeooo:paragraph-rsid="0904c81c" style:font-size-asian="12pt" style:font-style-asian="normal" style:font-weight-asian="normal" style:font-name-complex="Carlito" style:font-size-complex="12pt" style:font-style-complex="normal" style:font-weight-complex="normal"/>
    </style:style>
    <style:style style:name="T1" style:family="text">
      <style:text-properties officeooo:rsid="090957c0"/>
    </style:style>
    <style:style style:name="T2" style:family="text">
      <style:text-properties style:font-name="Carlito" fo:font-style="normal" style:font-style-asian="normal" style:font-name-complex="Carlito" style:font-style-complex="normal"/>
    </style:style>
    <style:style style:name="T3" style:family="text">
      <style:text-properties style:font-name="Carlito" fo:font-style="normal" officeooo:rsid="0465f79a" style:font-style-asian="normal" style:font-name-complex="Carlito" style:font-style-complex="normal"/>
    </style:style>
    <style:style style:name="T4" style:family="text">
      <style:text-properties style:font-name="Carlito" fo:font-style="normal" officeooo:rsid="046466e2" style:font-style-asian="normal" style:font-name-complex="Carlito" style:font-style-complex="normal"/>
    </style:style>
    <style:style style:name="T5" style:family="text">
      <style:text-properties style:font-name="Carlito" fo:font-style="normal" officeooo:rsid="0444a2d0" style:font-style-asian="normal" style:font-name-complex="Carlito" style:font-style-complex="normal"/>
    </style:style>
    <style:style style:name="T6" style:family="text">
      <style:text-properties style:font-name="Carlito" fo:font-style="normal" officeooo:rsid="044a1149" style:font-style-asian="normal" style:font-name-complex="Carlito" style:font-style-complex="normal"/>
    </style:style>
    <style:style style:name="T7" style:family="text">
      <style:text-properties style:font-name="Carlito" fo:font-style="normal" officeooo:rsid="0458225d" style:font-style-asian="normal" style:font-name-complex="Carlito" style:font-style-complex="normal"/>
    </style:style>
    <style:style style:name="T8" style:family="text">
      <style:text-properties style:font-name="Carlito" fo:font-style="normal" officeooo:rsid="044a74d1" style:font-style-asian="normal" style:font-name-complex="Carlito" style:font-style-complex="normal"/>
    </style:style>
    <style:style style:name="T9" style:family="text">
      <style:text-properties style:font-name="Carlito" fo:font-style="italic" officeooo:rsid="044a74d1" style:font-style-asian="italic" style:font-name-complex="Carlito" style:font-style-complex="italic"/>
    </style:style>
    <style:style style:name="T10" style:family="text">
      <style:text-properties style:font-name="Carlito" fo:font-style="normal" officeooo:rsid="0445aaff" style:font-style-asian="normal" style:font-name-complex="Carlito" style:font-style-complex="normal"/>
    </style:style>
    <style:style style:name="T11" style:family="text">
      <style:text-properties officeooo:rsid="044c2a0c"/>
    </style:style>
    <style:style style:name="T12" style:family="text">
      <style:text-properties officeooo:rsid="045167b3"/>
    </style:style>
    <style:style style:name="T13" style:family="text">
      <style:text-properties style:font-name="Carlito" officeooo:rsid="06deea8a" style:font-name-complex="Carlito"/>
    </style:style>
    <style:style style:name="T14" style:family="text">
      <style:text-properties style:font-name="Carlito" officeooo:rsid="06e16878" style:font-name-complex="Carlito"/>
    </style:style>
    <style:style style:name="T15" style:family="text">
      <style:text-properties fo:color="#127622" loext:opacity="100%" style:font-name="Gabriela Nerd Font" fo:font-size="12pt" fo:language="en" fo:country="US" officeooo:rsid="04553ef7" style:letter-kerning="false" style:font-name-asian="DejaVu Sans" style:font-size-asian="12pt" style:language-asian="zh" style:country-asian="CN" style:font-name-complex="Carlito" style:font-size-complex="12pt" style:language-complex="hi" style:country-complex="IN"/>
    </style:style>
    <style:style style:name="T16" style:family="text">
      <style:text-properties style:font-name="Carlito" officeooo:rsid="04553ef7" style:font-name-complex="Carlito"/>
    </style:style>
    <style:style style:name="T17" style:family="text">
      <style:text-properties style:font-name="Carlito" fo:font-style="normal" style:text-underline-style="none" officeooo:rsid="046a0e82" style:font-style-asian="normal" style:font-name-complex="Carlito" style:font-style-complex="normal"/>
    </style:style>
    <style:style style:name="T18" style:family="text">
      <style:text-properties style:font-name="Carlito" fo:font-style="normal" style:text-underline-style="none" officeooo:rsid="0807359d" style:font-style-asian="normal" style:font-name-complex="Carlito" style:font-style-complex="normal"/>
    </style:style>
    <style:style style:name="T19" style:family="text">
      <style:text-properties style:font-name="Carlito" style:text-underline-style="none" officeooo:rsid="04553ef7" style:font-name-complex="Carlito"/>
    </style:style>
    <style:style style:name="T20" style:family="text">
      <style:text-properties style:font-name="Carlito" style:text-underline-style="none" officeooo:rsid="0796e778" style:font-name-complex="Carlito"/>
    </style:style>
    <style:style style:name="T21" style:family="text">
      <style:text-properties style:font-name="Carlito" style:text-underline-style="none" officeooo:rsid="06e10a76" style:font-name-complex="Carlito"/>
    </style:style>
    <style:style style:name="T22" style:family="text">
      <style:text-properties style:font-name="Carlito" officeooo:rsid="046a0e82" style:font-name-complex="Carlito"/>
    </style:style>
    <style:style style:name="T23" style:family="text">
      <style:text-properties style:font-name="Carlito" officeooo:rsid="045e7e5c" style:font-name-complex="Carlito"/>
    </style:style>
    <style:style style:name="T24" style:family="text">
      <style:text-properties style:font-name="Carlito" officeooo:rsid="0475a115" style:font-name-complex="Carlito"/>
    </style:style>
    <style:style style:name="T25" style:family="text">
      <style:text-properties style:font-name="Carlito" officeooo:rsid="06e0d039" style:font-name-complex="Carlito"/>
    </style:style>
    <style:style style:name="T26" style:family="text">
      <style:text-properties style:font-name="Carlito" officeooo:rsid="05f8c90b" style:font-name-complex="Carlito"/>
    </style:style>
    <style:style style:name="T27" style:family="text">
      <style:text-properties style:font-name="Carlito" officeooo:rsid="0809052c" style:font-name-complex="Carlito"/>
    </style:style>
    <style:style style:name="T28" style:family="text">
      <style:text-properties style:font-name="Carlito" fo:font-style="italic" officeooo:rsid="06e0d039" style:font-style-asian="italic" style:font-name-complex="Carlito" style:font-style-complex="italic"/>
    </style:style>
    <style:style style:name="T29" style:family="text">
      <style:text-properties style:font-name="Carlito" officeooo:rsid="06e3219e" style:font-name-complex="Carlito"/>
    </style:style>
    <style:style style:name="T30" style:family="text">
      <style:text-properties officeooo:rsid="06eac88f"/>
    </style:style>
    <style:style style:name="T31" style:family="text">
      <style:text-properties officeooo:rsid="06e8559d"/>
    </style:style>
    <style:style style:name="T32" style:family="text">
      <style:text-properties style:text-position="super 58%"/>
    </style:style>
    <style:style style:name="T33" style:family="text">
      <style:text-properties fo:background-color="#fff5ce" loext:char-shading-value="0"/>
    </style:style>
    <style:style style:name="T34" style:family="text">
      <style:text-properties fo:background-color="#dedce6" loext:char-shading-value="0"/>
    </style:style>
    <style:style style:name="T35" style:family="text">
      <style:text-properties style:font-name="Carlito" fo:font-size="12pt" fo:font-weight="normal" officeooo:rsid="0030da69" style:font-size-asian="12pt" style:font-weight-asian="normal" style:font-name-complex="Carlito" style:font-size-complex="12pt" style:font-weight-complex="normal"/>
    </style:style>
    <style:style style:name="T36" style:family="text">
      <style:text-properties style:font-name="Carlito" fo:font-size="12pt" fo:font-weight="bold" officeooo:rsid="0030da69" style:font-size-asian="12pt" style:font-weight-asian="bold" style:font-name-complex="Carlito" style:font-size-complex="12pt" style:font-weight-complex="bold"/>
    </style:style>
    <style:style style:name="T37" style:family="text">
      <style:text-properties style:font-name="Carlito" fo:font-size="12pt" fo:font-weight="normal" officeooo:rsid="01676bf8" style:font-size-asian="12pt" style:font-weight-asian="normal" style:font-name-complex="Carlito" style:font-size-complex="12pt" style:font-weight-complex="normal"/>
    </style:style>
    <style:style style:name="T38" style:family="text">
      <style:text-properties style:font-name="Carlito" fo:font-size="12pt" fo:font-weight="normal" officeooo:rsid="01676bf8" fo:background-color="#dedce6" loext:char-shading-value="0" style:font-size-asian="12pt" style:font-weight-asian="normal" style:font-name-complex="Carlito" style:font-size-complex="12pt" style:font-weight-complex="normal"/>
    </style:style>
    <style:style style:name="T39" style:family="text">
      <style:text-properties fo:language="en" fo:country="US" style:language-asian="zh" style:country-asian="CN" style:language-complex="hi" style:country-complex="IN"/>
    </style:style>
    <style:style style:name="T40" style:family="text">
      <style:text-properties fo:background-color="transparent" loext:char-shading-value="0"/>
    </style:style>
    <style:style style:name="T41" style:family="text">
      <style:text-properties style:use-window-font-color="true" loext:opacity="0%" style:font-name="Carlito" fo:font-size="10pt" fo:font-weight="normal" style:font-size-asian="10pt" style:font-weight-asian="normal" style:font-name-complex="Carlito" style:font-size-complex="10pt" style:font-weight-complex="normal"/>
    </style:style>
    <style:style style:name="T42" style:family="text">
      <style:text-properties style:use-window-font-color="true" loext:opacity="0%" style:font-name="Carlito" fo:font-size="10pt" fo:font-weight="normal" officeooo:rsid="05818212" style:font-size-asian="10pt" style:font-weight-asian="normal" style:font-name-complex="Carlito" style:font-size-complex="10pt" style:font-weight-complex="normal"/>
    </style:style>
    <style:style style:name="T43" style:family="text">
      <style:text-properties style:font-name="Carlito" style:font-name-complex="Carlito"/>
    </style:style>
    <style:style style:name="T44" style:family="text">
      <style:text-properties style:font-name="Carlito" fo:background-color="transparent" loext:char-shading-value="0" style:font-name-complex="Carlito"/>
    </style:style>
    <style:style style:name="T45" style:family="text">
      <style:text-properties style:font-name="Carlito" fo:background-color="#fff5ce" loext:char-shading-value="0" style:font-name-complex="Carlito"/>
    </style:style>
    <style:style style:name="T46" style:family="text">
      <style:text-properties officeooo:rsid="04370e34"/>
    </style:style>
    <style:style style:name="T47" style:family="text">
      <style:text-properties officeooo:rsid="06eb6efa"/>
    </style:style>
    <style:style style:name="T48" style:family="text">
      <style:text-properties officeooo:rsid="079d70b8"/>
    </style:style>
    <style:style style:name="T49" style:family="text">
      <style:text-properties officeooo:rsid="079ac176"/>
    </style:style>
    <style:style style:name="T50" style:family="text">
      <style:text-properties officeooo:rsid="06ec090c"/>
    </style:style>
    <style:style style:name="T51" style:family="text">
      <style:text-properties officeooo:rsid="06ec166f"/>
    </style:style>
    <style:style style:name="T52" style:family="text">
      <style:text-properties officeooo:rsid="0796e778"/>
    </style:style>
    <style:style style:name="T53" style:family="text">
      <style:text-properties officeooo:rsid="07991fda"/>
    </style:style>
    <style:style style:name="T54" style:family="text">
      <style:text-properties officeooo:rsid="079de88e"/>
    </style:style>
    <style:style style:name="T55" style:family="text">
      <style:text-properties officeooo:rsid="08065051"/>
    </style:style>
    <style:style style:name="T56" style:family="text">
      <style:text-properties style:use-window-font-color="true" loext:opacity="0%" style:text-position="super 58%" style:font-name="Carlito" style:font-name-complex="Carlito"/>
    </style:style>
    <style:style style:name="T57" style:family="text">
      <style:text-properties fo:color="#ff0000" loext:opacity="100%" style:font-name="Carlito" style:font-name-complex="Carlito"/>
    </style:style>
    <style:style style:name="T58" style:family="text">
      <style:text-properties fo:color="#ff0000" loext:opacity="100%" style:font-name="Carlito" fo:background-color="#fff5ce" loext:char-shading-value="0" style:font-name-complex="Carlito"/>
    </style:style>
    <style:style style:name="T59" style:family="text">
      <style:text-properties fo:color="#ff0000" loext:opacity="100%" style:font-name="Carlito" fo:background-color="transparent" loext:char-shading-value="0" style:font-name-complex="Carlito"/>
    </style:style>
    <style:style style:name="T60" style:family="text">
      <style:text-properties style:font-name="Carlito" officeooo:rsid="03891641" style:font-name-complex="Carlito"/>
    </style:style>
    <style:style style:name="T61" style:family="text">
      <style:text-properties style:font-name="Carlito" officeooo:rsid="06f474af" style:font-name-complex="Carlito"/>
    </style:style>
    <style:style style:name="T62" style:family="text">
      <style:text-properties fo:color="#ff0000" loext:opacity="100%" style:font-name="Carlito" fo:font-style="italic" style:font-name-complex="Carlito"/>
    </style:style>
    <style:style style:name="T63" style:family="text">
      <style:text-properties officeooo:rsid="01cda18e"/>
    </style:style>
    <style:style style:name="T64" style:family="text">
      <style:text-properties officeooo:rsid="02187e0d"/>
    </style:style>
    <style:style style:name="T65" style:family="text">
      <style:text-properties officeooo:rsid="01d7fb54"/>
    </style:style>
    <style:style style:name="T66" style:family="text">
      <style:text-properties officeooo:rsid="043f59a9"/>
    </style:style>
    <style:style style:name="T67" style:family="text">
      <style:text-properties style:use-window-font-color="true" loext:opacity="0%" style:text-position="super 58%" style:font-name="Carlito" fo:background-color="transparent" loext:char-shading-value="0" style:font-name-complex="Carlito"/>
    </style:style>
    <style:style style:name="T68" style:family="text">
      <style:text-properties style:use-window-font-color="true" loext:opacity="0%" style:font-name="Carlito" fo:background-color="transparent" loext:char-shading-value="0" style:font-name-complex="Carlito"/>
    </style:style>
    <style:style style:name="T69" style:family="text">
      <style:text-properties style:use-window-font-color="true" loext:opacity="0%" style:text-position="super 58%"/>
    </style:style>
    <style:style style:name="T70" style:family="text">
      <style:text-properties style:use-window-font-color="true" loext:opacity="0%"/>
    </style:style>
    <style:style style:name="T71" style:family="text">
      <style:text-properties officeooo:rsid="029975bd"/>
    </style:style>
    <style:style style:name="T72" style:family="text">
      <style:text-properties style:use-window-font-color="true" loext:opacity="0%" style:text-position="super 58%" fo:font-weight="normal" officeooo:rsid="001d7715" style:letter-kerning="false" style:font-name-asian="DejaVu Sans" style:font-weight-asian="normal" style:font-weight-complex="normal"/>
    </style:style>
    <style:style style:name="T73" style:family="text">
      <style:text-properties style:use-window-font-color="true" loext:opacity="0%" officeooo:rsid="001e06da"/>
    </style:style>
    <style:style style:name="T74" style:family="text">
      <style:text-properties style:use-window-font-color="true" loext:opacity="0%" officeooo:rsid="001d7715"/>
    </style:style>
    <style:style style:name="T75" style:family="text">
      <style:text-properties officeooo:rsid="001d7715"/>
    </style:style>
    <style:style style:name="T76" style:family="text">
      <style:text-properties officeooo:rsid="001d7715" fo:background-color="#fff5ce" loext:char-shading-value="0"/>
    </style:style>
    <style:style style:name="T77" style:family="text">
      <style:text-properties style:text-position="super 58%" officeooo:rsid="00a44bfd" fo:background-color="#fff5ce" loext:char-shading-value="0"/>
    </style:style>
    <style:style style:name="T78" style:family="text">
      <style:text-properties officeooo:rsid="001e06da"/>
    </style:style>
    <style:style style:name="T79" style:family="text">
      <style:text-properties officeooo:rsid="001e06da" fo:background-color="#fff5ce" loext:char-shading-value="0"/>
    </style:style>
    <style:style style:name="T80" style:family="text">
      <style:text-properties style:text-position="super 58%" officeooo:rsid="01e5d05e" fo:background-color="#fff5ce" loext:char-shading-value="0"/>
    </style:style>
    <style:style style:name="T81" style:family="text">
      <style:text-properties officeooo:rsid="038d073b"/>
    </style:style>
    <style:style style:name="T82" style:family="text">
      <style:text-properties officeooo:rsid="00a79bb7"/>
    </style:style>
    <style:style style:name="T83" style:family="text">
      <style:text-properties officeooo:rsid="004612ca"/>
    </style:style>
    <style:style style:name="T84" style:family="text">
      <style:text-properties style:use-window-font-color="true" loext:opacity="0%" style:font-name="Carlito" fo:font-size="12pt" fo:font-weight="normal" style:font-size-asian="12pt" style:font-weight-asian="normal" style:font-name-complex="Carlito" style:font-size-complex="12pt" style:font-weight-complex="normal"/>
    </style:style>
    <style:style style:name="T85" style:family="text">
      <style:text-properties style:use-window-font-color="true" loext:opacity="0%" style:font-name="Carlito" fo:font-size="10pt" fo:font-weight="normal" officeooo:rsid="009583f9" style:font-size-asian="10pt" style:font-weight-asian="normal" style:font-name-complex="Carlito" style:font-size-complex="10pt" style:font-weight-complex="normal"/>
    </style:style>
    <style:style style:name="T86" style:family="text">
      <style:text-properties fo:color="#127622" loext:opacity="100%" style:font-name="Carlito" fo:font-size="12pt" fo:font-weight="bold" style:font-size-asian="12pt" style:font-weight-asian="bold" style:font-name-complex="Carlito" style:font-size-complex="12pt" style:font-weight-complex="bold"/>
    </style:style>
    <style:style style:name="T87" style:family="text">
      <style:text-properties style:use-window-font-color="true" loext:opacity="0%" style:font-name="Carlito" fo:font-size="12pt" fo:font-weight="normal" fo:background-color="#fff5ce" loext:char-shading-value="0" style:font-size-asian="12pt" style:font-weight-asian="normal" style:font-name-complex="Carlito" style:font-size-complex="12pt" style:font-weight-complex="normal"/>
    </style:style>
    <style:style style:name="T88" style:family="text">
      <style:text-properties style:use-window-font-color="true" loext:opacity="0%" style:text-position="super 58%" style:font-name="Carlito" fo:font-size="12pt" fo:font-weight="normal" fo:background-color="transparent" loext:char-shading-value="0" style:font-size-asian="12pt" style:font-weight-asian="normal" style:font-name-complex="Carlito" style:font-size-complex="12pt" style:font-weight-complex="normal"/>
    </style:style>
    <style:style style:name="T89" style:family="text">
      <style:text-properties style:use-window-font-color="true" loext:opacity="0%" style:font-name="Carlito" fo:font-size="10pt" fo:font-weight="normal" officeooo:rsid="01332615" style:font-size-asian="10pt" style:font-weight-asian="normal" style:font-name-complex="Carlito" style:font-size-complex="10pt" style:font-weight-complex="normal"/>
    </style:style>
    <style:style style:name="T90" style:family="text">
      <style:text-properties style:use-window-font-color="true" loext:opacity="0%" style:font-name="Carlito" fo:font-size="12pt" fo:font-style="italic" fo:font-weight="normal" style:font-size-asian="12pt" style:font-weight-asian="normal" style:font-name-complex="Carlito" style:font-size-complex="12pt" style:font-weight-complex="normal"/>
    </style:style>
    <style:style style:name="T91" style:family="text">
      <style:text-properties style:font-name="Carlito" fo:font-size="12pt" style:font-size-asian="12pt" style:font-name-complex="Carlito" style:font-size-complex="12pt"/>
    </style:style>
    <style:style style:name="T92" style:family="text">
      <style:text-properties style:font-name="Carlito" fo:font-size="12pt" fo:background-color="#fff5ce" loext:char-shading-value="0" style:font-size-asian="12pt" style:font-name-complex="Carlito" style:font-size-complex="12pt"/>
    </style:style>
    <style:style style:name="T93" style:family="text">
      <style:text-properties style:text-position="super 58%" style:font-name="Carlito" fo:font-size="12pt" fo:background-color="transparent" loext:char-shading-value="0" style:font-size-asian="12pt" style:font-name-complex="Carlito" style:font-size-complex="12pt"/>
    </style:style>
    <style:style style:name="T94" style:family="text">
      <style:text-properties fo:font-weight="bold" style:font-weight-asian="bold" style:font-weight-complex="bold"/>
    </style:style>
    <style:style style:name="T95" style:family="text">
      <style:text-properties officeooo:rsid="00d5425b"/>
    </style:style>
    <style:style style:name="T96" style:family="text">
      <style:text-properties officeooo:rsid="03e892b1"/>
    </style:style>
    <style:style style:name="T97" style:family="text">
      <style:text-properties fo:font-weight="normal" style:font-weight-asian="normal" style:font-weight-complex="normal"/>
    </style:style>
    <style:style style:name="T98" style:family="text">
      <style:text-properties style:text-position="super 58%" officeooo:rsid="03f3895e" fo:background-color="transparent" loext:char-shading-value="0"/>
    </style:style>
    <style:style style:name="T99" style:family="text">
      <style:text-properties style:text-position="super 58%" officeooo:rsid="03f5ed14" fo:background-color="transparent" loext:char-shading-value="0"/>
    </style:style>
    <style:style style:name="T100" style:family="text">
      <style:text-properties fo:font-style="italic" style:font-style-asian="italic" style:font-style-complex="italic"/>
    </style:style>
    <style:style style:name="T101" style:family="text">
      <style:text-properties officeooo:rsid="03f99fbd"/>
    </style:style>
    <style:style style:name="T102" style:family="text">
      <style:text-properties officeooo:rsid="03fc2a8a"/>
    </style:style>
    <style:style style:name="T103" style:family="text">
      <style:text-properties officeooo:rsid="03fa8718"/>
    </style:style>
    <style:style style:name="T104" style:family="text">
      <style:text-properties style:text-position="super 58%" officeooo:rsid="0088ac2b" fo:background-color="transparent" loext:char-shading-value="0"/>
    </style:style>
    <style:style style:name="T105" style:family="text">
      <style:text-properties style:use-window-font-color="true" loext:opacity="0%" style:font-name="Carlito" fo:font-size="12pt" fo:font-weight="normal" officeooo:rsid="00977bca" style:font-size-asian="12pt" style:font-weight-asian="normal" style:font-name-complex="Carlito" style:font-size-complex="12pt" style:font-weight-complex="normal"/>
    </style:style>
    <style:style style:name="T106" style:family="text">
      <style:text-properties style:use-window-font-color="true" loext:opacity="0%" style:font-name="Carlito" fo:font-size="12pt" fo:font-weight="normal" officeooo:rsid="03930fc9" style:font-size-asian="12pt" style:font-weight-asian="normal" style:font-name-complex="Carlito" style:font-size-complex="12pt" style:font-weight-complex="normal"/>
    </style:style>
    <style:style style:name="T107" style:family="text">
      <style:text-properties fo:font-weight="bold" officeooo:rsid="0088ac2b" style:font-weight-asian="bold" style:font-weight-complex="bold"/>
    </style:style>
    <style:style style:name="T108" style:family="text">
      <style:text-properties officeooo:rsid="0088ac2b"/>
    </style:style>
    <style:style style:name="T109" style:family="text">
      <style:text-properties officeooo:rsid="008c08e4"/>
    </style:style>
    <style:style style:name="T110" style:family="text">
      <style:text-properties fo:font-weight="normal" officeooo:rsid="03ec0c42" style:font-weight-asian="normal" style:font-weight-complex="normal"/>
    </style:style>
    <style:style style:name="T111" style:family="text">
      <style:text-properties style:text-position="super 58%" officeooo:rsid="008c08e4" fo:background-color="transparent" loext:char-shading-value="0"/>
    </style:style>
    <style:style style:name="T112" style:family="text">
      <style:text-properties fo:background-color="#ffb66c" loext:char-shading-value="0"/>
    </style:style>
    <style:style style:name="T113" style:family="text">
      <style:text-properties style:font-name="Carlito" fo:font-size="12pt" fo:background-color="#ffb66c" loext:char-shading-value="0" style:font-size-asian="12pt" style:font-name-complex="Carlito" style:font-size-complex="12pt"/>
    </style:style>
    <style:style style:name="T114" style:family="text">
      <style:text-properties style:text-position="super 58%" style:font-name="Carlito" fo:font-size="12pt" officeooo:rsid="008c08e4" fo:background-color="transparent" loext:char-shading-value="0" style:font-size-asian="12pt" style:font-name-complex="Carlito" style:font-size-complex="12pt"/>
    </style:style>
    <style:style style:name="T115" style:family="text">
      <style:text-properties style:font-name="Carlito" fo:font-size="12pt" fo:background-color="transparent" loext:char-shading-value="0" style:font-size-asian="12pt" style:font-name-complex="Carlito" style:font-size-complex="12pt"/>
    </style:style>
    <style:style style:name="T116" style:family="text">
      <style:text-properties style:use-window-font-color="true" loext:opacity="0%" style:text-position="super 58%" style:font-name="Carlito" fo:font-size="12pt" fo:background-color="transparent" loext:char-shading-value="0" style:font-size-asian="12pt" style:font-name-complex="Carlito" style:font-size-complex="12pt"/>
    </style:style>
    <style:style style:name="T117" style:family="text">
      <style:text-properties style:use-window-font-color="true" loext:opacity="0%" style:font-name="Carlito" fo:font-size="12pt" fo:background-color="transparent" loext:char-shading-value="0" style:font-size-asian="12pt" style:font-name-complex="Carlito" style:font-size-complex="12pt"/>
    </style:style>
    <style:style style:name="T118" style:family="text">
      <style:text-properties style:text-position="super 58%" style:font-name="Carlito" fo:font-size="12pt" officeooo:rsid="01e1ba45" fo:background-color="transparent" loext:char-shading-value="0" style:font-size-asian="12pt" style:font-name-complex="Carlito" style:font-size-complex="12pt"/>
    </style:style>
    <style:style style:name="T119" style:family="text">
      <style:text-properties fo:font-weight="normal" fo:background-color="#fff5ce" loext:char-shading-value="0" style:font-weight-asian="normal" style:font-weight-complex="normal"/>
    </style:style>
    <style:style style:name="T120" style:family="text">
      <style:text-properties fo:font-weight="normal" officeooo:rsid="03efd97f" style:font-weight-asian="normal" style:font-weight-complex="normal"/>
    </style:style>
    <style:style style:name="T121" style:family="text">
      <style:text-properties style:use-window-font-color="true" loext:opacity="0%" fo:font-size="10pt" fo:font-weight="normal" officeooo:rsid="05e48b92" style:font-size-asian="10pt" style:font-weight-asian="normal" style:font-size-complex="10pt" style:font-weight-complex="normal"/>
    </style:style>
    <style:style style:name="T122" style:family="text">
      <style:text-properties fo:color="#000000" loext:opacity="100%" style:text-position="super 58%" style:font-name="Carlito1" fo:font-size="12pt" fo:language="en" fo:country="US" style:letter-kerning="false" style:font-name-asian="DejaVu Sans" style:font-size-asian="12pt" style:language-asian="zh" style:country-asian="CN" style:font-name-complex="Noto Sans Arabic" style:font-size-complex="12pt" style:language-complex="hi" style:country-complex="IN"/>
    </style:style>
    <style:style style:name="T123" style:family="text">
      <style:text-properties fo:color="#000000" loext:opacity="100%" style:font-name="Carlito1" fo:font-size="12pt" fo:language="en" fo:country="US" style:letter-kerning="false" style:font-name-asian="DejaVu Sans" style:font-size-asian="12pt" style:language-asian="zh" style:country-asian="CN" style:font-name-complex="Noto Sans Arabic" style:font-size-complex="12pt" style:language-complex="hi" style:country-complex="IN"/>
    </style:style>
    <style:style style:name="T124" style:family="text">
      <style:text-properties fo:background-color="#dee6ef" loext:char-shading-value="0"/>
    </style:style>
    <style:style style:name="T125" style:family="text">
      <style:text-properties fo:color="#127622" loext:opacity="100%" style:text-position="super 58%" style:font-name="Gabriela Nerd Font" officeooo:rsid="05e6aaaf"/>
    </style:style>
    <style:style style:name="T126" style:family="text">
      <style:text-properties fo:color="#127622" loext:opacity="100%" style:text-position="super 58%" style:font-name="Gabriela Nerd Font" officeooo:rsid="07048e64"/>
    </style:style>
    <style:style style:name="T127" style:family="text">
      <style:text-properties fo:background-color="#ffbf00" loext:char-shading-value="0"/>
    </style:style>
    <style:style style:name="T128" style:family="text">
      <style:text-properties fo:background-color="#ffff00" loext:char-shading-value="0"/>
    </style:style>
    <style:style style:name="T129" style:family="text">
      <style:text-properties fo:font-style="italic"/>
    </style:style>
    <style:style style:name="T130" style:family="text">
      <style:text-properties officeooo:rsid="05ed91ef"/>
    </style:style>
    <style:style style:name="T131" style:family="text">
      <style:text-properties officeooo:rsid="05edf61e"/>
    </style:style>
    <style:style style:name="T132" style:family="text">
      <style:text-properties officeooo:rsid="05de18b2"/>
    </style:style>
    <style:style style:name="T133" style:family="text">
      <style:text-properties officeooo:rsid="05e2c749"/>
    </style:style>
    <style:style style:name="T134" style:family="text">
      <style:text-properties officeooo:rsid="05de5d7e"/>
    </style:style>
    <style:style style:name="T135" style:family="text">
      <style:text-properties officeooo:rsid="05dfc421"/>
    </style:style>
    <style:style style:name="T136" style:family="text">
      <style:text-properties officeooo:rsid="05eeefe6"/>
    </style:style>
    <style:style style:name="T137" style:family="text">
      <style:text-properties officeooo:rsid="05e0df75"/>
    </style:style>
    <style:style style:name="T138" style:family="text">
      <style:text-properties officeooo:rsid="05eb7571"/>
    </style:style>
    <style:style style:name="T139" style:family="text">
      <style:text-properties officeooo:rsid="07a88e96"/>
    </style:style>
    <style:style style:name="T140" style:family="text">
      <style:text-properties fo:font-style="normal" officeooo:rsid="05eeefe6" style:font-style-asian="normal" style:font-style-complex="normal"/>
    </style:style>
    <style:style style:name="T141" style:family="text">
      <style:text-properties fo:font-style="normal" officeooo:rsid="05efe183" style:font-style-asian="normal" style:font-style-complex="normal"/>
    </style:style>
    <style:style style:name="T142" style:family="text">
      <style:text-properties fo:color="#127622" loext:opacity="100%" style:font-name="Gabriela Nerd Font" fo:font-size="12pt" fo:language="en" fo:country="US" officeooo:rsid="07076d22" style:letter-kerning="false" style:font-name-asian="DejaVu Sans" style:font-size-asian="12pt" style:language-asian="zh" style:country-asian="CN" style:font-name-complex="Carlito" style:font-size-complex="12pt" style:language-complex="hi" style:country-complex="IN"/>
    </style:style>
    <style:style style:name="T143" style:family="text">
      <style:text-properties fo:font-style="normal" officeooo:rsid="07057f85" style:font-style-asian="normal" style:font-style-complex="normal"/>
    </style:style>
    <style:style style:name="T144" style:family="text">
      <style:text-properties officeooo:rsid="07bfc5c5"/>
    </style:style>
    <style:style style:name="T145" style:family="text">
      <style:text-properties officeooo:rsid="07d35660"/>
    </style:style>
    <style:style style:name="T146" style:family="text">
      <style:text-properties style:text-position="super 58%" officeooo:rsid="039746b0" fo:background-color="transparent" loext:char-shading-value="0"/>
    </style:style>
    <style:style style:name="T147" style:family="text">
      <style:text-properties style:text-position="super 58%" style:font-name="Carlito" fo:font-size="12pt" officeooo:rsid="026de1cb" style:font-size-asian="12pt" style:font-name-complex="Carlito" style:font-size-complex="12pt"/>
    </style:style>
    <style:style style:name="T148" style:family="text">
      <style:text-properties style:text-position="super 58%" officeooo:rsid="0398b3d2" fo:background-color="transparent" loext:char-shading-value="0"/>
    </style:style>
    <style:style style:name="T149" style:family="text">
      <style:text-properties style:text-position="super 58%" style:font-name="Carlito" fo:font-size="12pt" officeooo:rsid="02774028" style:font-size-asian="12pt" style:font-name-complex="Carlito" style:font-size-complex="12pt"/>
    </style:style>
    <style:style style:name="T150" style:family="text">
      <style:text-properties style:font-name="Carlito" fo:font-size="12pt" officeooo:rsid="05da3f11" style:font-size-asian="12pt" style:font-name-complex="Carlito" style:font-size-complex="12pt"/>
    </style:style>
    <style:style style:name="T151" style:family="text">
      <style:text-properties style:font-name="Carlito" fo:font-size="12pt" officeooo:rsid="05db1483" style:font-size-asian="12pt" style:font-name-complex="Carlito" style:font-size-complex="12pt"/>
    </style:style>
    <style:style style:name="T152" style:family="text">
      <style:text-properties style:font-name="Carlito" fo:font-size="12pt" officeooo:rsid="07a5d63c" style:font-size-asian="12pt" style:font-name-complex="Carlito" style:font-size-complex="12pt"/>
    </style:style>
    <style:style style:name="T153" style:family="text">
      <style:text-properties style:font-name="Carlito" fo:font-size="12pt" fo:font-weight="normal" officeooo:rsid="0014d882" style:font-size-asian="12pt" style:font-weight-asian="normal" style:font-name-complex="Carlito" style:font-size-complex="12pt" style:font-weight-complex="normal"/>
    </style:style>
    <style:style style:name="T154" style:family="text">
      <style:text-properties style:text-position="super 58%" style:font-name="Carlito" fo:font-size="12pt" fo:font-weight="normal" officeooo:rsid="0014d882" style:font-size-asian="12pt" style:font-weight-asian="normal" style:font-name-complex="Carlito" style:font-size-complex="12pt" style:font-weight-complex="normal"/>
    </style:style>
    <style:style style:name="T155" style:family="text">
      <style:text-properties style:font-name="Carlito" fo:font-size="12pt" fo:font-weight="normal" officeooo:rsid="0014d882" fo:background-color="#fff5ce" loext:char-shading-value="0" style:font-size-asian="12pt" style:font-weight-asian="normal" style:font-name-complex="Carlito" style:font-size-complex="12pt" style:font-weight-complex="normal"/>
    </style:style>
    <style:style style:name="T156" style:family="text">
      <style:text-properties style:text-position="super 58%" style:font-name="Carlito" fo:font-size="12pt" fo:font-weight="normal" officeooo:rsid="0016b0f2" fo:background-color="transparent" loext:char-shading-value="0" style:font-size-asian="12pt" style:font-weight-asian="normal" style:font-name-complex="Carlito" style:font-size-complex="12pt" style:font-weight-complex="normal"/>
    </style:style>
    <style:style style:name="T157" style:family="text">
      <style:text-properties style:text-position="super 58%" officeooo:rsid="0014d882"/>
    </style:style>
    <style:style style:name="T158" style:family="text">
      <style:text-properties officeooo:rsid="0014d882"/>
    </style:style>
    <style:style style:name="T159" style:family="text">
      <style:text-properties officeooo:rsid="0014d882" fo:background-color="#fff5ce" loext:char-shading-value="0"/>
    </style:style>
    <style:style style:name="T160" style:family="text">
      <style:text-properties fo:font-style="italic" officeooo:rsid="0014d882"/>
    </style:style>
    <style:style style:name="T161" style:family="text">
      <style:text-properties style:font-name="Carlito" fo:font-size="12pt" fo:font-weight="normal" officeooo:rsid="07b6f967" style:font-size-asian="12pt" style:font-weight-asian="normal" style:font-name-complex="Carlito" style:font-size-complex="12pt" style:font-weight-complex="normal"/>
    </style:style>
    <style:style style:name="T162" style:family="text">
      <style:text-properties style:font-name="Carlito" fo:font-size="12pt" fo:font-weight="normal" officeooo:rsid="04289026" style:font-size-asian="12pt" style:font-weight-asian="normal" style:font-name-complex="Carlito" style:font-size-complex="12pt" style:font-weight-complex="normal"/>
    </style:style>
    <style:style style:name="T163" style:family="text">
      <style:text-properties style:font-name="Carlito" fo:font-size="12pt" fo:font-weight="normal" officeooo:rsid="0435f47f" style:font-size-asian="12pt" style:font-weight-asian="normal" style:font-name-complex="Carlito" style:font-size-complex="12pt" style:font-weight-complex="normal"/>
    </style:style>
    <style:style style:name="T164" style:family="text">
      <style:text-properties style:font-name="Carlito" fo:font-size="12pt" fo:font-weight="normal" officeooo:rsid="083ee16e" style:font-size-asian="12pt" style:font-weight-asian="normal" style:font-name-complex="Carlito" style:font-size-complex="12pt" style:font-weight-complex="normal"/>
    </style:style>
    <style:style style:name="T165" style:family="text">
      <style:text-properties style:font-name="Carlito" fo:font-size="12pt" fo:font-weight="normal" officeooo:rsid="042e87f7" style:font-size-asian="12pt" style:font-weight-asian="normal" style:font-name-complex="Carlito" style:font-size-complex="12pt" style:font-weight-complex="normal"/>
    </style:style>
    <style:style style:name="T166" style:family="text">
      <style:text-properties style:font-name="Carlito" fo:font-size="12pt" fo:font-weight="normal" officeooo:rsid="042f8d36" style:font-size-asian="12pt" style:font-weight-asian="normal" style:font-name-complex="Carlito" style:font-size-complex="12pt" style:font-weight-complex="normal"/>
    </style:style>
    <style:style style:name="T167" style:family="text">
      <style:text-properties style:font-name="Carlito" fo:font-size="12pt" fo:font-weight="normal" officeooo:rsid="04357a00" style:font-size-asian="12pt" style:font-weight-asian="normal" style:font-name-complex="Carlito" style:font-size-complex="12pt" style:font-weight-complex="normal"/>
    </style:style>
    <style:style style:name="T168" style:family="text">
      <style:text-properties style:font-name="Carlito" fo:font-size="12pt" fo:font-weight="normal" officeooo:rsid="04313329" style:font-size-asian="12pt" style:font-weight-asian="normal" style:font-name-complex="Carlito" style:font-size-complex="12pt" style:font-weight-complex="normal"/>
    </style:style>
    <style:style style:name="T169" style:family="text">
      <style:text-properties officeooo:rsid="02a5ef6f"/>
    </style:style>
    <style:style style:name="T170" style:family="text">
      <style:text-properties officeooo:rsid="02a1ec14"/>
    </style:style>
    <style:style style:name="T171" style:family="text">
      <style:text-properties style:text-underline-style="none" officeooo:rsid="01e5d337"/>
    </style:style>
    <style:style style:name="T172" style:family="text">
      <style:text-properties style:text-underline-style="none" officeooo:rsid="06fe31b0"/>
    </style:style>
    <style:style style:name="T173" style:family="text">
      <style:text-properties style:text-underline-style="none" officeooo:rsid="027ade8c"/>
    </style:style>
    <style:style style:name="T174" style:family="text">
      <style:text-properties style:text-underline-style="none" officeooo:rsid="00da8446"/>
    </style:style>
    <style:style style:name="T175" style:family="text">
      <style:text-properties style:text-underline-style="none" officeooo:rsid="02fd2d46"/>
    </style:style>
    <style:style style:name="T176" style:family="text">
      <style:text-properties style:text-underline-style="none" officeooo:rsid="0413cc2f"/>
    </style:style>
    <style:style style:name="T177" style:family="text">
      <style:text-properties style:font-name="BlackChancery" fo:font-size="14pt" officeooo:rsid="048d0179" style:font-size-asian="14pt" style:font-size-complex="14pt"/>
    </style:style>
    <style:style style:name="T178" style:family="text">
      <style:text-properties style:font-name="BlackChancery" fo:font-size="14pt" style:font-size-asian="14pt" style:font-size-complex="14pt"/>
    </style:style>
    <style:style style:name="T179" style:family="text">
      <style:text-properties style:text-position="super 58%" officeooo:rsid="07aed607"/>
    </style:style>
    <style:style style:name="T180" style:family="text">
      <style:text-properties fo:background-color="#ffdbb6" loext:char-shading-value="0"/>
    </style:style>
    <style:style style:name="T181" style:family="text">
      <style:text-properties style:text-position="super 58%" officeooo:rsid="07b05dfc"/>
    </style:style>
    <style:style style:name="T182" style:family="text">
      <style:text-properties style:text-position="super 58%" officeooo:rsid="07d0539c"/>
    </style:style>
    <style:style style:name="T183" style:family="text">
      <style:text-properties style:text-position="super 58%" officeooo:rsid="07b95c0e"/>
    </style:style>
    <style:style style:name="T184" style:family="text">
      <style:text-properties officeooo:rsid="07d1014a"/>
    </style:style>
    <style:style style:name="T185" style:family="text">
      <style:text-properties officeooo:rsid="07ce50ac"/>
    </style:style>
    <style:style style:name="T186" style:family="text">
      <style:text-properties officeooo:rsid="07cf7d8f"/>
    </style:style>
    <style:style style:name="T187" style:family="text">
      <style:text-properties officeooo:rsid="07db0178"/>
    </style:style>
    <style:style style:name="T188" style:family="text">
      <style:text-properties officeooo:rsid="07dd9314"/>
    </style:style>
    <style:style style:name="T189" style:family="text">
      <style:text-properties officeooo:rsid="07dbf3c4"/>
    </style:style>
    <style:style style:name="T190" style:family="text">
      <style:text-properties officeooo:rsid="07e56f9b"/>
    </style:style>
    <style:style style:name="T191" style:family="text">
      <style:text-properties fo:color="#127622" loext:opacity="100%" style:font-name="Gabriela Nerd Font" fo:font-size="12pt" fo:language="en" fo:country="US" officeooo:rsid="07dbf3c4" style:letter-kerning="false" style:font-name-asian="DejaVu Sans" style:font-size-asian="12pt" style:language-asian="zh" style:country-asian="CN" style:font-name-complex="Carlito" style:font-size-complex="12pt" style:language-complex="hi" style:country-complex="IN"/>
    </style:style>
    <style:style style:name="T192" style:family="text">
      <style:text-properties fo:color="#127622" loext:opacity="100%" style:font-name="Gabriela Nerd Font" fo:font-size="12pt" fo:language="en" fo:country="US" officeooo:rsid="04553ef7" style:letter-kerning="false" style:font-name-asian="DejaVu Sans" style:language-asian="zh" style:country-asian="CN" style:font-name-complex="Carlito" style:language-complex="hi" style:country-complex="IN"/>
    </style:style>
    <style:style style:name="T193" style:family="text">
      <style:text-properties fo:color="#127622" loext:opacity="100%" style:font-name="Carlito" fo:font-size="12pt" fo:font-weight="bold" style:font-weight-asian="bold" style:font-name-complex="Carlito" style:font-weight-complex="bold"/>
    </style:style>
    <style:style style:name="T194" style:family="text">
      <style:text-properties style:use-window-font-color="true" loext:opacity="0%" style:font-name="Carlito" fo:font-size="12pt" fo:font-style="normal" fo:font-weight="normal" style:font-name-complex="Carlito"/>
    </style:style>
    <style:style style:name="T195" style:family="text">
      <style:text-properties style:use-window-font-color="true" loext:opacity="0%" style:font-name="Carlito" fo:font-size="12pt" fo:font-style="normal" fo:font-weight="normal" fo:background-color="#fff5ce" loext:char-shading-value="0" style:font-name-complex="Carlito"/>
    </style:style>
    <style:style style:name="T196" style:family="text">
      <style:text-properties style:use-window-font-color="true" loext:opacity="0%" style:font-name="Carlito" fo:font-size="12pt" fo:font-style="normal" fo:font-weight="normal" fo:background-color="transparent" loext:char-shading-value="0" style:font-name-complex="Carlito"/>
    </style:style>
    <style:style style:name="T197" style:family="text">
      <style:text-properties style:use-window-font-color="true" loext:opacity="0%" style:text-position="super 58%" fo:font-weight="normal" style:letter-kerning="false" style:font-name-asian="DejaVu Sans"/>
    </style:style>
    <style:style style:name="T198" style:family="text">
      <style:text-properties fo:color="#127622" loext:opacity="100%" fo:font-weight="bold" style:letter-kerning="false" style:font-name-asian="DejaVu Sans" style:font-weight-asian="bold" style:font-weight-complex="bold"/>
    </style:style>
    <style:style style:name="T199" style:family="text">
      <style:text-properties fo:font-weight="normal"/>
    </style:style>
    <style:style style:name="T200" style:family="text">
      <style:text-properties fo:font-weight="normal" fo:background-color="#fff5ce" loext:char-shading-value="0"/>
    </style:style>
    <style:style style:name="T201" style:family="text">
      <style:text-properties style:font-name="Carlito" fo:font-size="12pt" fo:font-weight="normal" style:font-size-asian="12pt" style:font-weight-asian="normal" style:font-name-complex="Carlito" style:font-size-complex="12pt" style:font-weight-complex="normal"/>
    </style:style>
    <style:style style:name="T202" style:family="text">
      <style:text-properties style:font-name="Carlito" fo:font-size="12pt" fo:font-weight="normal" officeooo:rsid="0015c405" style:font-size-asian="12pt" style:font-weight-asian="normal" style:font-name-complex="Carlito" style:font-size-complex="12pt" style:font-weight-complex="normal"/>
    </style:style>
    <style:style style:name="T203" style:family="text">
      <style:text-properties style:font-name="Carlito" fo:font-size="12pt" fo:font-weight="normal" officeooo:rsid="018758f4" style:font-size-asian="12pt" style:font-weight-asian="normal" style:font-name-complex="Carlito" style:font-size-complex="12pt" style:font-weight-complex="normal"/>
    </style:style>
    <style:style style:name="T204" style:family="text">
      <style:text-properties style:font-name="Carlito" fo:font-size="12pt" fo:font-weight="normal" officeooo:rsid="00586ebb" style:font-size-asian="12pt" style:font-weight-asian="normal" style:font-name-complex="Carlito" style:font-size-complex="12pt" style:font-weight-complex="normal"/>
    </style:style>
    <style:style style:name="T205" style:family="text">
      <style:text-properties style:font-name="Carlito" fo:font-size="12pt" fo:font-weight="normal" officeooo:rsid="00f144fe" style:font-size-asian="12pt" style:font-weight-asian="normal" style:font-name-complex="Carlito" style:font-size-complex="12pt" style:font-weight-complex="normal"/>
    </style:style>
    <style:style style:name="T206" style:family="text">
      <style:text-properties style:font-name="Carlito" fo:font-size="12pt" fo:font-weight="normal" officeooo:rsid="02238d42" style:font-size-asian="12pt" style:font-weight-asian="normal" style:font-name-complex="Carlito" style:font-size-complex="12pt" style:font-weight-complex="normal"/>
    </style:style>
    <style:style style:name="T207" style:family="text">
      <style:text-properties style:font-name="Carlito" fo:font-size="12pt" fo:font-weight="normal" officeooo:rsid="00ef5a72" style:font-size-asian="12pt" style:font-weight-asian="normal" style:font-name-complex="Carlito" style:font-size-complex="12pt" style:font-weight-complex="normal"/>
    </style:style>
    <style:style style:name="T208" style:family="text">
      <style:text-properties style:font-name="Carlito" fo:font-size="12pt" fo:font-weight="normal" officeooo:rsid="00f00641" style:font-size-asian="12pt" style:font-weight-asian="normal" style:font-name-complex="Carlito" style:font-size-complex="12pt" style:font-weight-complex="normal"/>
    </style:style>
    <style:style style:name="T209" style:family="text">
      <style:text-properties style:font-name="Carlito" fo:font-size="12pt" fo:font-weight="normal" officeooo:rsid="027c48cf" style:font-size-asian="12pt" style:font-weight-asian="normal" style:font-name-complex="Carlito" style:font-size-complex="12pt" style:font-weight-complex="normal"/>
    </style:style>
    <style:style style:name="T210" style:family="text">
      <style:text-properties style:font-name="Carlito" fo:font-size="12pt" fo:font-weight="normal" officeooo:rsid="001c219a" style:font-size-asian="12pt" style:font-weight-asian="normal" style:font-name-complex="Carlito" style:font-size-complex="12pt" style:font-weight-complex="normal"/>
    </style:style>
    <style:style style:name="T211" style:family="text">
      <style:text-properties style:use-window-font-color="true" loext:opacity="0%" style:font-name="Carlito" fo:font-size="12pt" fo:font-weight="normal" officeooo:rsid="001c219a" style:font-size-asian="12pt" style:font-weight-asian="normal" style:font-name-complex="Carlito" style:font-size-complex="12pt" style:font-weight-complex="normal"/>
    </style:style>
    <style:style style:name="T212" style:family="text">
      <style:text-properties style:use-window-font-color="true" loext:opacity="0%" style:font-name="Carlito" fo:font-size="12pt" fo:font-weight="normal" officeooo:rsid="00f144fe" style:font-size-asian="12pt" style:font-weight-asian="normal" style:font-name-complex="Carlito" style:font-size-complex="12pt" style:font-weight-complex="normal"/>
    </style:style>
    <style:style style:name="T213" style:family="text">
      <style:text-properties style:use-window-font-color="true" loext:opacity="0%" style:font-name="Carlito" fo:font-size="12pt" fo:font-weight="normal" officeooo:rsid="00ef5a72" style:font-size-asian="12pt" style:font-weight-asian="normal" style:font-name-complex="Carlito" style:font-size-complex="12pt" style:font-weight-complex="normal"/>
    </style:style>
    <style:style style:name="T214" style:family="text">
      <style:text-properties fo:color="#127622" loext:opacity="100%" style:font-name="Carlito" fo:font-size="12pt" fo:font-weight="normal" officeooo:rsid="00ef5a72" style:font-size-asian="12pt" style:font-weight-asian="normal" style:font-name-complex="Carlito" style:font-size-complex="12pt" style:font-weight-complex="normal"/>
    </style:style>
    <style:style style:name="T215" style:family="text">
      <style:text-properties style:use-window-font-color="true" loext:opacity="0%" style:font-name="Carlito" fo:font-size="12pt" fo:font-weight="normal" officeooo:rsid="071022bf" style:font-size-asian="12pt" style:font-weight-asian="normal" style:font-name-complex="Carlito" style:font-size-complex="12pt" style:font-weight-complex="normal"/>
    </style:style>
    <style:style style:name="T216" style:family="text">
      <style:text-properties style:use-window-font-color="true" loext:opacity="0%" style:font-name="Carlito" fo:font-size="12pt" fo:font-weight="normal" officeooo:rsid="0187c83c" style:font-size-asian="12pt" style:font-weight-asian="normal" style:font-name-complex="Carlito" style:font-size-complex="12pt" style:font-weight-complex="normal"/>
    </style:style>
    <style:style style:name="T217" style:family="text">
      <style:text-properties style:use-window-font-color="true" loext:opacity="0%" style:text-position="super 58%" style:font-name="Carlito" fo:font-size="12pt" fo:font-weight="normal" officeooo:rsid="0187c83c" style:font-size-asian="12pt" style:font-weight-asian="normal" style:font-name-complex="Carlito" style:font-size-complex="12pt" style:font-weight-complex="normal"/>
    </style:style>
    <style:style style:name="T218" style:family="text">
      <style:text-properties fo:color="#127622" loext:opacity="100%" style:font-name="Gabriela Nerd Font" fo:font-size="12pt" fo:language="en" fo:country="US" fo:font-weight="normal" officeooo:rsid="04553ef7" style:letter-kerning="false" style:font-name-asian="DejaVu Sans" style:font-size-asian="12pt" style:language-asian="zh" style:country-asian="CN" style:font-weight-asian="normal" style:font-name-complex="Carlito" style:font-size-complex="12pt" style:language-complex="hi" style:country-complex="IN" style:font-weight-complex="normal"/>
    </style:style>
    <style:style style:name="T219" style:family="text">
      <style:text-properties style:use-window-font-color="true" loext:opacity="0%" style:font-name="Carlito" fo:font-size="12pt" fo:font-weight="normal" officeooo:rsid="0300fd9a" style:font-size-asian="12pt" style:font-weight-asian="normal" style:font-name-complex="Carlito" style:font-size-complex="12pt" style:font-weight-complex="normal"/>
    </style:style>
    <style:style style:name="T220" style:family="text">
      <style:text-properties style:use-window-font-color="true" loext:opacity="0%" style:font-name="Carlito" fo:font-size="12pt" fo:font-weight="normal" officeooo:rsid="02a299e5" style:font-size-asian="12pt" style:font-weight-asian="normal" style:font-name-complex="Carlito" style:font-size-complex="12pt" style:font-weight-complex="normal"/>
    </style:style>
    <style:style style:name="T221" style:family="text">
      <style:text-properties officeooo:rsid="071543e9"/>
    </style:style>
    <style:style style:name="T222" style:family="text">
      <style:text-properties officeooo:rsid="071205f0"/>
    </style:style>
    <style:style style:name="T223" style:family="text">
      <style:text-properties fo:font-style="normal" officeooo:rsid="063817bf" style:font-style-asian="normal" style:font-style-complex="normal"/>
    </style:style>
    <style:style style:name="T224" style:family="text">
      <style:text-properties officeooo:rsid="0840cb70"/>
    </style:style>
    <style:style style:name="T225" style:family="text">
      <style:text-properties officeooo:rsid="08405090"/>
    </style:style>
    <style:style style:name="T226" style:family="text">
      <style:text-properties style:text-underline-style="none"/>
    </style:style>
    <style:style style:name="T227" style:family="text">
      <style:text-properties officeooo:rsid="08413a87"/>
    </style:style>
    <style:style style:name="T228" style:family="text">
      <style:text-properties officeooo:rsid="07552c93"/>
    </style:style>
    <style:style style:name="T229" style:family="text">
      <style:text-properties fo:font-style="normal" officeooo:rsid="0755b370" style:font-style-asian="normal" style:font-style-complex="normal"/>
    </style:style>
    <style:style style:name="T230" style:family="text">
      <style:text-properties style:use-window-font-color="true" loext:opacity="0%" style:text-position="super 58%" style:font-name="Carlito" fo:font-size="12pt" fo:font-style="normal" style:font-size-asian="12pt" style:font-style-asian="normal" style:font-name-complex="Carlito" style:font-size-complex="12pt" style:font-style-complex="normal"/>
    </style:style>
    <style:style style:name="T231" style:family="text">
      <style:text-properties style:font-name="Carlito" fo:font-size="12pt" fo:font-style="normal" style:font-size-asian="12pt" style:font-style-asian="normal" style:font-name-complex="Carlito" style:font-size-complex="12pt" style:font-style-complex="normal"/>
    </style:style>
    <style:style style:name="T232" style:family="text">
      <style:text-properties style:font-name="Carlito" fo:font-size="12pt" fo:font-style="normal" fo:background-color="#fff5ce" loext:char-shading-value="0" style:font-size-asian="12pt" style:font-style-asian="normal" style:font-name-complex="Carlito" style:font-size-complex="12pt" style:font-style-complex="normal"/>
    </style:style>
    <style:style style:name="T233" style:family="text">
      <style:text-properties style:text-position="super 58%" style:font-name="Carlito" fo:font-size="12pt" fo:font-style="normal" officeooo:rsid="00f67ea9" style:font-size-asian="12pt" style:font-style-asian="normal" style:font-name-complex="Carlito" style:font-size-complex="12pt" style:font-style-complex="normal"/>
    </style:style>
    <style:style style:name="T234" style:family="text">
      <style:text-properties officeooo:rsid="07cae093"/>
    </style:style>
    <style:style style:name="T235" style:family="text">
      <style:text-properties officeooo:rsid="0837dc7b"/>
    </style:style>
    <style:style style:name="T236" style:family="text">
      <style:text-properties officeooo:rsid="0800fe81"/>
    </style:style>
    <style:style style:name="T237" style:family="text">
      <style:text-properties officeooo:rsid="0803170b"/>
    </style:style>
    <style:style style:name="T238" style:family="text">
      <style:text-properties officeooo:rsid="08029552"/>
    </style:style>
    <style:style style:name="T239" style:family="text">
      <style:text-properties officeooo:rsid="0804669a"/>
    </style:style>
    <style:style style:name="T240" style:family="text">
      <style:text-properties style:font-name="BlackChancery" fo:font-size="14pt" officeooo:rsid="04aa969d" style:font-size-asian="12.25pt" style:font-size-complex="14pt"/>
    </style:style>
    <style:style style:name="T241" style:family="text">
      <style:text-properties style:font-name="BlackChancery" fo:font-size="14pt" officeooo:rsid="0816cc22" style:font-size-asian="12.25pt" style:font-size-complex="14pt"/>
    </style:style>
    <style:style style:name="T242" style:family="text">
      <style:text-properties style:font-name="Carlito" fo:font-size="12pt" fo:background-color="#ffff00" loext:char-shading-value="0" style:font-size-asian="12pt" style:font-name-complex="Carlito" style:font-size-complex="12pt"/>
    </style:style>
    <style:style style:name="T243" style:family="text">
      <style:text-properties fo:language="en" fo:country="US" officeooo:rsid="084edcf4" style:language-asian="zh" style:country-asian="CN" style:language-complex="hi" style:country-complex="IN"/>
    </style:style>
    <style:style style:name="T244" style:family="text">
      <style:text-properties style:font-name="Carlito" fo:font-size="12pt" officeooo:rsid="023c2369" style:font-size-asian="12pt" style:font-name-complex="Carlito" style:font-size-complex="12pt"/>
    </style:style>
    <style:style style:name="T245" style:family="text">
      <style:text-properties style:font-name="Carlito" fo:font-size="12pt" officeooo:rsid="084edcf4" style:font-size-asian="12pt" style:font-name-complex="Carlito" style:font-size-complex="12pt"/>
    </style:style>
    <style:style style:name="T246" style:family="text">
      <style:text-properties style:font-name="Carlito" fo:font-size="12pt" officeooo:rsid="08236409" style:font-size-asian="12pt" style:font-name-complex="Carlito" style:font-size-complex="12pt"/>
    </style:style>
    <style:style style:name="T247" style:family="text">
      <style:text-properties style:font-name="Carlito" fo:font-size="12pt" officeooo:rsid="0821654e" style:font-size-asian="12pt" style:font-name-complex="Carlito" style:font-size-complex="12pt"/>
    </style:style>
    <style:style style:name="T248" style:family="text">
      <style:text-properties style:font-name="Carlito" fo:font-size="12pt" officeooo:rsid="084f7f57" style:font-size-asian="12pt" style:font-name-complex="Carlito" style:font-size-complex="12pt"/>
    </style:style>
    <style:style style:name="T249" style:family="text">
      <style:text-properties style:font-name="Carlito" fo:font-size="12pt" fo:font-style="italic" officeooo:rsid="023c2369" style:font-size-asian="12pt" style:font-style-asian="italic" style:font-name-complex="Carlito" style:font-size-complex="12pt" style:font-style-complex="italic"/>
    </style:style>
    <style:style style:name="T250" style:family="text">
      <style:text-properties style:font-name="Carlito" fo:font-size="12pt" fo:font-style="normal" officeooo:rsid="023c2369" style:font-size-asian="12pt" style:font-style-asian="normal" style:font-name-complex="Carlito" style:font-size-complex="12pt" style:font-style-complex="normal"/>
    </style:style>
    <style:style style:name="T251" style:family="text">
      <style:text-properties style:font-name="Carlito" fo:font-size="12pt" fo:font-style="normal" officeooo:rsid="0287c120" style:font-size-asian="12pt" style:font-style-asian="normal" style:font-name-complex="Carlito" style:font-size-complex="12pt" style:font-style-complex="normal"/>
    </style:style>
    <style:style style:name="T252" style:family="text">
      <style:text-properties style:font-name="Carlito" fo:font-size="12pt" fo:font-style="normal" officeooo:rsid="023cd7ce" style:font-size-asian="12pt" style:font-style-asian="normal" style:font-name-complex="Carlito" style:font-size-complex="12pt" style:font-style-complex="normal"/>
    </style:style>
    <style:style style:name="T253" style:family="text">
      <style:text-properties style:font-name="Carlito" fo:font-size="12pt" fo:font-style="normal" officeooo:rsid="0287ebb1" style:font-size-asian="12pt" style:font-style-asian="normal" style:font-name-complex="Carlito" style:font-size-complex="12pt" style:font-style-complex="normal"/>
    </style:style>
    <style:style style:name="T254" style:family="text">
      <style:text-properties style:font-name="Carlito" fo:font-size="12pt" fo:font-style="italic" officeooo:rsid="023cd7ce" style:font-size-asian="12pt" style:font-style-asian="italic" style:font-name-complex="Carlito" style:font-size-complex="12pt" style:font-style-complex="italic"/>
    </style:style>
    <style:style style:name="T255" style:family="text">
      <style:text-properties style:font-name="Carlito" fo:font-size="12pt" fo:font-style="normal" officeooo:rsid="07cb9d95" style:font-size-asian="12pt" style:font-style-asian="normal" style:font-name-complex="Carlito" style:font-size-complex="12pt" style:font-style-complex="normal"/>
    </style:style>
    <style:style style:name="T256" style:family="text">
      <style:text-properties style:font-name="Carlito" fo:font-size="12pt" fo:font-style="normal" officeooo:rsid="033ab273" style:font-size-asian="12pt" style:font-style-asian="normal" style:font-name-complex="Carlito" style:font-size-complex="12pt" style:font-style-complex="normal"/>
    </style:style>
    <style:style style:name="T257" style:family="text">
      <style:text-properties style:font-name="Carlito" fo:font-size="12pt" fo:font-style="normal" officeooo:rsid="07567213" style:font-size-asian="12pt" style:font-style-asian="normal" style:font-name-complex="Carlito" style:font-size-complex="12pt" style:font-style-complex="normal"/>
    </style:style>
    <style:style style:name="T258" style:family="text">
      <style:text-properties style:font-name="Carlito" fo:font-size="12pt" fo:font-style="normal" officeooo:rsid="071bca57" style:font-size-asian="12pt" style:font-style-asian="normal" style:font-name-complex="Carlito" style:font-size-complex="12pt" style:font-style-complex="normal"/>
    </style:style>
    <style:style style:name="T259" style:family="text">
      <style:text-properties style:font-name="Carlito" fo:font-size="12pt" fo:font-style="normal" officeooo:rsid="03ab3cad" style:font-size-asian="12pt" style:font-style-asian="normal" style:font-name-complex="Carlito" style:font-size-complex="12pt" style:font-style-complex="normal"/>
    </style:style>
    <style:style style:name="T260" style:family="text">
      <style:text-properties style:font-name="Carlito" fo:font-size="12pt" fo:font-style="italic" officeooo:rsid="03ab3cad" style:font-size-asian="12pt" style:font-style-asian="italic" style:font-name-complex="Carlito" style:font-size-complex="12pt" style:font-style-complex="italic"/>
    </style:style>
    <style:style style:name="T261" style:family="text">
      <style:text-properties style:font-name="Carlito" fo:font-size="12pt" fo:font-style="normal" officeooo:rsid="0759b5f6" style:font-size-asian="12pt" style:font-style-asian="normal" style:font-name-complex="Carlito" style:font-size-complex="12pt" style:font-style-complex="normal"/>
    </style:style>
    <style:style style:name="T262" style:family="text">
      <style:text-properties style:font-name="Carlito" fo:font-size="12pt" fo:font-style="normal" officeooo:rsid="03b05fcb" style:font-size-asian="12pt" style:font-style-asian="normal" style:font-name-complex="Carlito" style:font-size-complex="12pt" style:font-style-complex="normal"/>
    </style:style>
    <style:style style:name="T263" style:family="text">
      <style:text-properties style:font-name="Carlito" fo:font-size="12pt" fo:font-style="normal" officeooo:rsid="0757d0d5" style:font-size-asian="12pt" style:font-style-asian="normal" style:font-name-complex="Carlito" style:font-size-complex="12pt" style:font-style-complex="normal"/>
    </style:style>
    <style:style style:name="T264" style:family="text">
      <style:text-properties style:font-name="Carlito" fo:font-size="12pt" fo:font-style="normal" officeooo:rsid="075a47f1" style:font-size-asian="12pt" style:font-style-asian="normal" style:font-name-complex="Carlito" style:font-size-complex="12pt" style:font-style-complex="normal"/>
    </style:style>
    <style:style style:name="T265" style:family="text">
      <style:text-properties style:font-name="Carlito" fo:font-size="12pt" fo:font-style="normal" officeooo:rsid="075b6295" style:font-size-asian="12pt" style:font-style-asian="normal" style:font-name-complex="Carlito" style:font-size-complex="12pt" style:font-style-complex="normal"/>
    </style:style>
    <style:style style:name="T266" style:family="text">
      <style:text-properties style:font-name="Carlito" fo:font-size="12pt" fo:font-style="normal" officeooo:rsid="0823b52d" style:font-size-asian="12pt" style:font-style-asian="normal" style:font-name-complex="Carlito" style:font-size-complex="12pt" style:font-style-complex="normal"/>
    </style:style>
    <style:style style:name="T267" style:family="text">
      <style:text-properties style:font-name="Carlito" fo:font-size="12pt" fo:font-style="normal" officeooo:rsid="08253092" style:font-size-asian="12pt" style:font-style-asian="normal" style:font-name-complex="Carlito" style:font-size-complex="12pt" style:font-style-complex="normal"/>
    </style:style>
    <style:style style:name="T268" style:family="text">
      <style:text-properties fo:color="#127622" loext:opacity="100%" style:font-name="Gabriela Nerd Font" fo:font-size="12pt" fo:language="en" fo:country="US" officeooo:rsid="0855108e" style:letter-kerning="false" style:font-name-asian="DejaVu Sans" style:font-size-asian="12pt" style:language-asian="zh" style:country-asian="CN" style:font-name-complex="Carlito" style:font-size-complex="12pt" style:language-complex="hi" style:country-complex="IN"/>
    </style:style>
    <style:style style:name="T269" style:family="text">
      <style:text-properties style:text-position="super 58%" officeooo:rsid="03ad87e1"/>
    </style:style>
    <style:style style:name="T270" style:family="text">
      <style:text-properties fo:font-style="normal" style:font-style-asian="normal" style:font-style-complex="normal"/>
    </style:style>
    <style:style style:name="T271" style:family="text">
      <style:text-properties fo:font-style="italic" officeooo:rsid="085580ca" style:font-style-asian="italic" style:font-style-complex="italic"/>
    </style:style>
    <style:style style:name="T272" style:family="text">
      <style:text-properties fo:font-style="normal" officeooo:rsid="03b5095d" style:font-style-asian="normal" style:font-style-complex="normal"/>
    </style:style>
    <style:style style:name="T273" style:family="text">
      <style:text-properties style:font-name="Carlito" fo:font-size="12pt" officeooo:rsid="071e56aa" style:font-size-asian="12pt" style:font-name-complex="Carlito" style:font-size-complex="12pt"/>
    </style:style>
    <style:style style:name="T274" style:family="text">
      <style:text-properties style:font-name="Carlito" fo:font-size="12pt" officeooo:rsid="03ae96e6" style:font-size-asian="12pt" style:font-name-complex="Carlito" style:font-size-complex="12pt"/>
    </style:style>
    <style:style style:name="T275" style:family="text">
      <style:text-properties style:font-name="Carlito" fo:font-size="12pt" officeooo:rsid="06533665" style:font-size-asian="12pt" style:font-name-complex="Carlito" style:font-size-complex="12pt"/>
    </style:style>
    <style:style style:name="T276" style:family="text">
      <style:text-properties style:font-name="Carlito" fo:font-size="12pt" fo:font-style="italic" officeooo:rsid="03ae96e6" style:font-size-asian="12pt" style:font-style-asian="italic" style:font-name-complex="Carlito" style:font-size-complex="12pt" style:font-style-complex="italic"/>
    </style:style>
    <style:style style:name="T277" style:family="text">
      <style:text-properties officeooo:rsid="0819d4fa"/>
    </style:style>
    <style:style style:name="T278" style:family="text">
      <style:text-properties fo:color="#127622" loext:opacity="100%" style:font-name="Gabriela Nerd Font" fo:font-size="12pt" fo:language="en" fo:country="US" officeooo:rsid="076afdb1" style:letter-kerning="false" style:font-name-asian="DejaVu Sans" style:font-size-asian="12pt" style:language-asian="zh" style:country-asian="CN" style:font-name-complex="Carlito" style:font-size-complex="12pt" style:language-complex="hi" style:country-complex="IN"/>
    </style:style>
    <style:style style:name="T279" style:family="text">
      <style:text-properties fo:font-size="10pt" officeooo:rsid="06545f83" style:font-size-asian="10pt" style:font-size-complex="10pt"/>
    </style:style>
    <style:style style:name="T280" style:family="text">
      <style:text-properties fo:font-size="10pt" officeooo:rsid="0773d0b2" style:font-size-asian="10pt" style:font-size-complex="10pt"/>
    </style:style>
    <style:style style:name="T281" style:family="text">
      <style:text-properties fo:font-size="10pt" officeooo:rsid="07726d35" style:font-size-asian="10pt" style:font-size-complex="10pt"/>
    </style:style>
    <style:style style:name="T282" style:family="text">
      <style:text-properties fo:font-size="10pt" officeooo:rsid="0775865c" style:font-size-asian="10pt" style:font-size-complex="10pt"/>
    </style:style>
    <style:style style:name="T283" style:family="text">
      <style:text-properties fo:font-size="10pt" officeooo:rsid="07772d7e" style:font-size-asian="10pt" style:font-size-complex="10pt"/>
    </style:style>
    <style:style style:name="T284" style:family="text">
      <style:text-properties style:text-position="super 58%" officeooo:rsid="076afdb1"/>
    </style:style>
    <style:style style:name="T285" style:family="text">
      <style:text-properties officeooo:rsid="076afdb1"/>
    </style:style>
    <style:style style:name="T286" style:family="text">
      <style:text-properties fo:background-color="#dee7e5" loext:char-shading-value="0"/>
    </style:style>
    <style:style style:name="T287" style:family="text">
      <style:text-properties fo:background-color="#ffd7d7" loext:char-shading-value="0"/>
    </style:style>
    <style:style style:name="T288" style:family="text">
      <style:text-properties fo:color="#127622" loext:opacity="100%" style:font-name="Gabriela Nerd Font" fo:font-size="12pt" fo:language="en" fo:country="US" officeooo:rsid="07639dd5" style:letter-kerning="false" style:font-name-asian="DejaVu Sans" style:font-size-asian="12pt" style:language-asian="zh" style:country-asian="CN" style:font-name-complex="Carlito" style:font-size-complex="12pt" style:language-complex="hi" style:country-complex="IN"/>
    </style:style>
    <style:style style:name="T289" style:family="text">
      <style:text-properties style:text-position="super 58%" officeooo:rsid="07639dd5"/>
    </style:style>
    <style:style style:name="T290" style:family="text">
      <style:text-properties officeooo:rsid="07639dd5"/>
    </style:style>
    <style:style style:name="T291" style:family="text">
      <style:text-properties fo:background-color="#f7d1d5" loext:char-shading-value="0"/>
    </style:style>
    <style:style style:name="T292" style:family="text">
      <style:text-properties fo:background-color="#ffd8ce" loext:char-shading-value="0"/>
    </style:style>
    <style:style style:name="T293" style:family="text">
      <style:text-properties style:font-name="Carlito" fo:font-size="12pt" fo:font-style="normal" fo:font-weight="normal" officeooo:rsid="065546eb" style:font-size-asian="12pt" style:font-style-asian="normal" style:font-weight-asian="normal" style:font-name-complex="Carlito" style:font-size-complex="12pt" style:font-style-complex="normal" style:font-weight-complex="normal"/>
    </style:style>
    <style:style style:name="T294" style:family="text">
      <style:text-properties style:font-name="Carlito" fo:font-size="12pt" fo:font-style="normal" fo:font-weight="normal" officeooo:rsid="072a23ab" style:font-size-asian="12pt" style:font-style-asian="normal" style:font-weight-asian="normal" style:font-name-complex="Carlito" style:font-size-complex="12pt" style:font-style-complex="normal" style:font-weight-complex="normal"/>
    </style:style>
    <style:style style:name="T295" style:family="text">
      <style:text-properties style:font-name="Carlito" fo:font-size="12pt" fo:font-style="normal" fo:font-weight="normal" officeooo:rsid="076eb61e" style:font-size-asian="12pt" style:font-style-asian="normal" style:font-weight-asian="normal" style:font-name-complex="Carlito" style:font-size-complex="12pt" style:font-style-complex="normal" style:font-weight-complex="normal"/>
    </style:style>
    <style:style style:name="T296" style:family="text">
      <style:text-properties style:font-name="Carlito" fo:font-size="12pt" fo:font-style="normal" fo:font-weight="normal" officeooo:rsid="081dd264" style:font-size-asian="12pt" style:font-style-asian="normal" style:font-weight-asian="normal" style:font-name-complex="Carlito" style:font-size-complex="12pt" style:font-style-complex="normal" style:font-weight-complex="normal"/>
    </style:style>
    <style:style style:name="T297" style:family="text">
      <style:text-properties style:font-name="Carlito" fo:font-size="12pt" fo:font-style="normal" fo:font-weight="normal" officeooo:rsid="076fcab5" style:font-size-asian="12pt" style:font-style-asian="normal" style:font-weight-asian="normal" style:font-name-complex="Carlito" style:font-size-complex="12pt" style:font-style-complex="normal" style:font-weight-complex="normal"/>
    </style:style>
    <style:style style:name="T298" style:family="text">
      <style:text-properties style:font-name="Carlito" fo:font-size="12pt" fo:font-style="normal" fo:font-weight="normal" officeooo:rsid="081c18b0" style:font-size-asian="12pt" style:font-style-asian="normal" style:font-weight-asian="normal" style:font-name-complex="Carlito" style:font-size-complex="12pt" style:font-style-complex="normal" style:font-weight-complex="normal"/>
    </style:style>
    <style:style style:name="T299" style:family="text">
      <style:text-properties style:font-name="Carlito" fo:font-size="12pt" fo:font-style="normal" fo:font-weight="normal" officeooo:rsid="0777fe8d" style:font-size-asian="12pt" style:font-style-asian="normal" style:font-weight-asian="normal" style:font-name-complex="Carlito" style:font-size-complex="12pt" style:font-style-complex="normal" style:font-weight-complex="normal"/>
    </style:style>
    <style:style style:name="T300" style:family="text">
      <style:text-properties style:font-name="BlackChancery" fo:font-size="14pt" officeooo:rsid="04b1aefc" style:font-size-asian="12.25pt" style:font-name-complex="Carlito" style:font-size-complex="14pt"/>
    </style:style>
    <style:style style:name="T301" style:family="text">
      <style:text-properties style:font-name="BlackChancery" fo:font-size="14pt" officeooo:rsid="04b007f2" style:font-size-asian="12.25pt" style:font-name-complex="Carlito" style:font-size-complex="14pt"/>
    </style:style>
    <style:style style:name="T302" style:family="text">
      <style:text-properties style:font-name="BlackChancery" fo:font-size="14pt" officeooo:rsid="075d001f" style:font-size-asian="12.25pt" style:font-name-complex="Carlito" style:font-size-complex="14pt"/>
    </style:style>
    <style:style style:name="T303" style:family="text">
      <style:text-properties style:text-position="super 58%" officeooo:rsid="0098fa98" fo:background-color="#fff5ce" loext:char-shading-value="0"/>
    </style:style>
    <style:style style:name="T304" style:family="text">
      <style:text-properties fo:color="#ff0000" loext:opacity="100%" fo:background-color="#fff5ce" loext:char-shading-value="0"/>
    </style:style>
    <style:style style:name="T305" style:family="text">
      <style:text-properties fo:color="#ff0000" loext:opacity="100%"/>
    </style:style>
    <style:style style:name="T306" style:family="text">
      <style:text-properties style:font-name="Carlito" fo:font-size="12pt" officeooo:rsid="075d1154" style:font-size-asian="12pt" style:font-name-complex="Carlito" style:font-size-complex="12pt"/>
    </style:style>
    <style:style style:name="T307" style:family="text">
      <style:text-properties style:font-name="Carlito" fo:font-size="12pt" officeooo:rsid="03bbae72" style:font-size-asian="12pt" style:font-name-complex="Carlito" style:font-size-complex="12pt"/>
    </style:style>
    <style:style style:name="T308" style:family="text">
      <style:text-properties style:font-name="Carlito" fo:font-size="12pt" officeooo:rsid="0858622f" style:font-size-asian="12pt" style:font-name-complex="Carlito" style:font-size-complex="12pt"/>
    </style:style>
    <style:style style:name="T309" style:family="text">
      <style:text-properties style:font-name="Carlito" fo:font-size="12pt" fo:font-style="italic" officeooo:rsid="0856c0fa" style:font-size-asian="12pt" style:font-style-asian="italic" style:font-name-complex="Carlito" style:font-size-complex="12pt" style:font-style-complex="italic"/>
    </style:style>
    <style:style style:name="T310" style:family="text">
      <style:text-properties style:font-name="Carlito" fo:font-size="12pt" fo:font-style="normal" officeooo:rsid="0856c0fa" style:font-size-asian="12pt" style:font-style-asian="normal" style:font-name-complex="Carlito" style:font-size-complex="12pt" style:font-style-complex="normal"/>
    </style:style>
    <style:style style:name="T311" style:family="text">
      <style:text-properties style:font-name="Carlito" fo:font-size="12pt" officeooo:rsid="0856c0fa" style:font-size-asian="12pt" style:font-name-complex="Carlito" style:font-size-complex="12pt"/>
    </style:style>
    <style:style style:name="T312" style:family="text">
      <style:text-properties style:font-name="Carlito" fo:font-size="12pt" officeooo:rsid="0833fe80" style:font-size-asian="12pt" style:font-name-complex="Carlito" style:font-size-complex="12pt"/>
    </style:style>
    <style:style style:name="T313" style:family="text">
      <style:text-properties style:font-name="Carlito" fo:font-size="12pt" officeooo:rsid="0834d05f" style:font-size-asian="12pt" style:font-name-complex="Carlito" style:font-size-complex="12pt"/>
    </style:style>
    <style:style style:name="T314" style:family="text">
      <style:text-properties style:font-name="Carlito" fo:font-size="12pt" officeooo:rsid="04b644d0" style:font-size-asian="12pt" style:font-name-complex="Carlito" style:font-size-complex="12pt"/>
    </style:style>
    <style:style style:name="T315" style:family="text">
      <style:text-properties style:font-name="Carlito" fo:font-size="12pt" officeooo:rsid="04b3d63d" style:font-size-asian="12pt" style:font-name-complex="Carlito" style:font-size-complex="12pt"/>
    </style:style>
    <style:style style:name="T316" style:family="text">
      <style:text-properties style:font-name="Carlito" fo:font-size="12pt" officeooo:rsid="085a3547" style:font-size-asian="12pt" style:font-name-complex="Carlito" style:font-size-complex="12pt"/>
    </style:style>
    <style:style style:name="T317" style:family="text">
      <style:text-properties style:font-name="Carlito" fo:font-size="12pt" officeooo:rsid="08294a6b" style:font-size-asian="12pt" style:font-name-complex="Carlito" style:font-size-complex="12pt"/>
    </style:style>
    <style:style style:name="T318" style:family="text">
      <style:text-properties style:font-name="Carlito" fo:font-size="12pt" officeooo:rsid="082c1bb0" style:font-size-asian="12pt" style:font-name-complex="Carlito" style:font-size-complex="12pt"/>
    </style:style>
    <style:style style:name="T319" style:family="text">
      <style:text-properties style:font-name="Carlito" fo:font-size="12pt" officeooo:rsid="085c2fd9" style:font-size-asian="12pt" style:font-name-complex="Carlito" style:font-size-complex="12pt"/>
    </style:style>
    <style:style style:name="T320" style:family="text">
      <style:text-properties officeooo:rsid="065c374c"/>
    </style:style>
    <style:style style:name="T321" style:family="text">
      <style:text-properties officeooo:rsid="0720e4a6"/>
    </style:style>
    <style:style style:name="T322" style:family="text">
      <style:text-properties officeooo:rsid="082f575f"/>
    </style:style>
    <style:style style:name="T323" style:family="text">
      <style:text-properties officeooo:rsid="08317c58"/>
    </style:style>
    <style:style style:name="T324" style:family="text">
      <style:text-properties officeooo:rsid="08318412"/>
    </style:style>
    <style:style style:name="T325" style:family="text">
      <style:text-properties officeooo:rsid="083297c9"/>
    </style:style>
    <style:style style:name="T326" style:family="text">
      <style:text-properties officeooo:rsid="09130011"/>
    </style:style>
    <style:style style:name="T327" style:family="text">
      <style:text-properties officeooo:rsid="09134030"/>
    </style:style>
    <style:style style:name="T328" style:family="text">
      <style:text-properties fo:color="#127622" loext:opacity="100%" style:font-name="Gabriela Nerd Font" fo:font-size="12pt" fo:language="en" fo:country="US" officeooo:rsid="085d02b2" style:letter-kerning="false" style:font-name-asian="DejaVu Sans" style:font-size-asian="12pt" style:language-asian="zh" style:country-asian="CN" style:font-name-complex="Carlito" style:font-size-complex="12pt" style:language-complex="hi" style:country-complex="IN"/>
    </style:style>
    <style:style style:name="T329" style:family="text">
      <style:text-properties officeooo:rsid="082d0af2"/>
    </style:style>
    <style:style style:name="T330" style:family="text">
      <style:text-properties officeooo:rsid="085ca553"/>
    </style:style>
    <style:style style:name="T331" style:family="text">
      <style:text-properties officeooo:rsid="091ae195"/>
    </style:style>
    <style:style style:name="T332" style:family="text">
      <style:text-properties officeooo:rsid="091e8c11"/>
    </style:style>
    <style:style style:name="T333" style:family="text">
      <style:text-properties officeooo:rsid="09206530"/>
    </style:style>
    <style:style style:name="T334" style:family="text">
      <style:text-properties officeooo:rsid="0923c289"/>
    </style:style>
    <style:style style:name="T335" style:family="text">
      <style:text-properties style:font-name="BlackChancery" fo:font-size="14pt" officeooo:rsid="03463892" style:font-size-asian="14pt" style:font-name-complex="Carlito" style:font-size-complex="14pt"/>
    </style:style>
    <style:style style:name="T336" style:family="text">
      <style:text-properties style:font-name="BlackChancery" fo:font-size="14pt" officeooo:rsid="0347d861" style:font-size-asian="14pt" style:font-name-complex="Carlito" style:font-size-complex="14pt"/>
    </style:style>
    <style:style style:name="T337" style:family="text">
      <style:text-properties style:font-name="Carlito" fo:font-size="12pt" officeooo:rsid="03463892" style:font-size-asian="12pt" style:font-name-complex="Carlito" style:font-size-complex="12pt"/>
    </style:style>
    <style:style style:name="T338" style:family="text">
      <style:text-properties fo:color="#ff0000" loext:opacity="100%" fo:background-color="#ffd7d7" loext:char-shading-value="0"/>
    </style:style>
    <style:style style:name="T339" style:family="text">
      <style:text-properties fo:color="#ff0000" loext:opacity="100%" fo:background-color="#dedce6" loext:char-shading-value="0"/>
    </style:style>
    <style:style style:name="T340" style:family="text">
      <style:text-properties fo:color="#ff0000" loext:opacity="100%" style:text-position="super 58%" officeooo:rsid="0098fa98" fo:background-color="#dedce6" loext:char-shading-value="0"/>
    </style:style>
    <style:style style:name="T341" style:family="text">
      <style:text-properties fo:color="#ff0000" loext:opacity="100%" fo:background-color="transparent" loext:char-shading-value="0"/>
    </style:style>
    <style:style style:name="T342" style:family="text">
      <style:text-properties officeooo:rsid="00ed9aea"/>
    </style:style>
    <style:style style:name="T343" style:family="text">
      <style:text-properties officeooo:rsid="00ed2452"/>
    </style:style>
    <style:style style:name="T344" style:family="text">
      <style:text-properties style:use-window-font-color="true" loext:opacity="0%" style:font-name="Carlito" fo:font-size="12pt" officeooo:rsid="0107fc1e" style:font-size-asian="12pt" style:font-name-complex="Carlito" style:font-size-complex="12pt"/>
    </style:style>
    <style:style style:name="T345" style:family="text">
      <style:text-properties style:use-window-font-color="true" loext:opacity="0%" style:font-name="Carlito" fo:font-size="12pt" officeooo:rsid="011125ac" style:font-size-asian="12pt" style:font-name-complex="Carlito" style:font-size-complex="12pt"/>
    </style:style>
    <style:style style:name="T346" style:family="text">
      <style:text-properties style:use-window-font-color="true" loext:opacity="0%" style:font-name="Carlito" fo:font-size="12pt" officeooo:rsid="0111da2d" style:font-size-asian="12pt" style:font-name-complex="Carlito" style:font-size-complex="12pt"/>
    </style:style>
    <style:style style:name="T347" style:family="text">
      <style:text-properties style:use-window-font-color="true" loext:opacity="0%" style:font-name="Carlito" fo:font-size="12pt" officeooo:rsid="0111caf1" style:font-size-asian="12pt" style:font-name-complex="Carlito" style:font-size-complex="12pt"/>
    </style:style>
    <style:style style:name="T348" style:family="text">
      <style:text-properties style:use-window-font-color="true" loext:opacity="0%" style:font-name="Carlito" fo:font-size="12pt" officeooo:rsid="009c408f" style:font-size-asian="12pt" style:font-name-complex="Carlito" style:font-size-complex="12pt"/>
    </style:style>
    <style:style style:name="T349" style:family="text">
      <style:text-properties fo:color="#127622" loext:opacity="100%" style:font-name="Carlito" fo:font-size="12pt" officeooo:rsid="009c408f" style:font-size-asian="12pt" style:font-name-complex="Carlito" style:font-size-complex="12pt"/>
    </style:style>
    <style:style style:name="T350" style:family="text">
      <style:text-properties style:use-window-font-color="true" loext:opacity="0%" style:font-name="Carlito" fo:font-size="12pt" officeooo:rsid="01105bed" style:font-size-asian="12pt" style:font-name-complex="Carlito" style:font-size-complex="12pt"/>
    </style:style>
    <style:style style:name="T351" style:family="text">
      <style:text-properties style:font-name="Carlito" fo:font-size="12pt" officeooo:rsid="01093e96" style:font-size-asian="12pt" style:font-name-complex="Carlito" style:font-size-complex="12pt"/>
    </style:style>
    <style:style style:name="T352" style:family="text">
      <style:text-properties style:font-name="Carlito" fo:font-size="12pt" officeooo:rsid="01048f51" style:font-size-asian="12pt" style:font-name-complex="Carlito" style:font-size-complex="12pt"/>
    </style:style>
    <style:style style:name="T353" style:family="text">
      <style:text-properties style:font-name="Carlito" fo:font-size="12pt" officeooo:rsid="01063be5" style:font-size-asian="12pt" style:font-name-complex="Carlito" style:font-size-complex="12pt"/>
    </style:style>
    <style:style style:name="T354" style:family="text">
      <style:text-properties style:font-name="Carlito" fo:font-size="12pt" officeooo:rsid="0107fc1e" style:font-size-asian="12pt" style:font-name-complex="Carlito" style:font-size-complex="12pt"/>
    </style:style>
    <style:style style:name="T355" style:family="text">
      <style:text-properties style:font-name="Carlito" fo:font-size="12pt" officeooo:rsid="010956f6" style:font-size-asian="12pt" style:font-name-complex="Carlito" style:font-size-complex="12pt"/>
    </style:style>
    <style:style style:name="T356" style:family="text">
      <style:text-properties officeooo:rsid="085f268e"/>
    </style:style>
    <style:style style:name="T357" style:family="text">
      <style:text-properties fo:font-style="normal" style:text-underline-style="none" style:font-style-asian="normal" style:font-style-complex="normal"/>
    </style:style>
    <style:style style:name="T358" style:family="text">
      <style:text-properties officeooo:rsid="0344dc42"/>
    </style:style>
    <style:style style:name="T359" style:family="text">
      <style:text-properties style:use-window-font-color="true" loext:opacity="0%" style:font-name="Carlito" fo:font-size="12pt" fo:font-style="normal" officeooo:rsid="0865c9c0" style:font-size-asian="12pt" style:font-style-asian="normal" style:font-name-complex="Carlito" style:font-size-complex="12pt" style:font-style-complex="normal"/>
    </style:style>
    <style:style style:name="T360" style:family="text">
      <style:text-properties style:use-window-font-color="true" loext:opacity="0%" style:font-name="Carlito" fo:font-size="12pt" fo:font-style="normal" officeooo:rsid="0928474d" style:font-size-asian="12pt" style:font-style-asian="normal" style:font-name-complex="Carlito" style:font-size-complex="12pt" style:font-style-complex="normal"/>
    </style:style>
    <style:style style:name="T361" style:family="text">
      <style:text-properties style:use-window-font-color="true" loext:opacity="0%" fo:font-style="normal" officeooo:rsid="0668d772" style:font-style-asian="normal" style:font-style-complex="normal"/>
    </style:style>
    <style:style style:name="T362" style:family="text">
      <style:text-properties style:use-window-font-color="true" loext:opacity="0%" fo:font-style="normal" style:font-style-asian="normal" style:font-style-complex="normal"/>
    </style:style>
    <style:style style:name="T363" style:family="text">
      <style:text-properties style:use-window-font-color="true" loext:opacity="0%" fo:font-style="normal" officeooo:rsid="092b170c" style:font-style-asian="normal" style:font-style-complex="normal"/>
    </style:style>
    <style:style style:name="T364" style:family="text">
      <style:text-properties style:use-window-font-color="true" loext:opacity="0%" officeooo:rsid="04e42ce8"/>
    </style:style>
    <style:style style:name="T365" style:family="text">
      <style:text-properties fo:color="#ff0000" loext:opacity="100%" fo:background-color="#ffbf00" loext:char-shading-value="0"/>
    </style:style>
    <style:style style:name="T366" style:family="text">
      <style:text-properties fo:color="#ff0000" loext:opacity="100%" fo:background-color="#ffdbb6" loext:char-shading-value="0"/>
    </style:style>
    <style:style style:name="T367" style:family="text">
      <style:text-properties officeooo:rsid="04db1565"/>
    </style:style>
    <style:style style:name="T368" style:family="text">
      <style:text-properties fo:color="#127622" loext:opacity="100%" style:font-name="Gabriela Nerd Font" fo:language="en" fo:country="US" officeooo:rsid="04553ef7" style:letter-kerning="false" style:font-name-asian="DejaVu Sans" style:language-asian="zh" style:country-asian="CN" style:language-complex="hi" style:country-complex="IN"/>
    </style:style>
    <style:style style:name="T369" style:family="text">
      <style:text-properties officeooo:rsid="04dab161"/>
    </style:style>
    <style:style style:name="T370" style:family="text">
      <style:text-properties officeooo:rsid="073fc600"/>
    </style:style>
    <style:style style:name="T371" style:family="text">
      <style:text-properties officeooo:rsid="03c7f790"/>
    </style:style>
    <style:style style:name="T372" style:family="text">
      <style:text-properties fo:color="#ff0000" loext:opacity="100%" officeooo:rsid="04d74df4" fo:background-color="transparent" loext:char-shading-value="0"/>
    </style:style>
    <style:style style:name="T373" style:family="text">
      <style:text-properties officeooo:rsid="04d74df4"/>
    </style:style>
    <style:style style:name="T374" style:family="text">
      <style:text-properties fo:font-weight="normal" officeooo:rsid="073d478d" style:font-weight-asian="normal" style:font-weight-complex="normal"/>
    </style:style>
    <style:style style:name="T375" style:family="text">
      <style:text-properties officeooo:rsid="073d478d"/>
    </style:style>
    <style:style style:name="T376" style:family="text">
      <style:text-properties officeooo:rsid="0868ec84"/>
    </style:style>
    <style:style style:name="T377" style:family="text">
      <style:text-properties officeooo:rsid="074491cd"/>
    </style:style>
    <style:style style:name="T378" style:family="text">
      <style:text-properties officeooo:rsid="086baa09"/>
    </style:style>
    <style:style style:name="T379" style:family="text">
      <style:text-properties officeooo:rsid="0869c264"/>
    </style:style>
    <style:style style:name="T380" style:family="text">
      <style:text-properties officeooo:rsid="0869e232"/>
    </style:style>
    <style:style style:name="T381" style:family="text">
      <style:text-properties officeooo:rsid="07376832"/>
    </style:style>
    <style:style style:name="T382" style:family="text">
      <style:text-properties officeooo:rsid="04c1ea1f"/>
    </style:style>
    <style:style style:name="T383" style:family="text">
      <style:text-properties style:font-name="Carlito" fo:font-size="12pt" officeooo:rsid="08615946" style:font-size-asian="12pt" style:font-name-complex="Carlito" style:font-size-complex="12pt"/>
    </style:style>
    <style:style style:name="T384" style:family="text">
      <style:text-properties fo:font-style="normal" officeooo:rsid="08b933cd" style:font-style-asian="normal" style:font-style-complex="normal"/>
    </style:style>
    <style:style style:name="T385" style:family="text">
      <style:text-properties fo:font-style="normal" officeooo:rsid="05311bf8" style:font-style-asian="normal" style:font-style-complex="normal"/>
    </style:style>
    <style:style style:name="T386" style:family="text">
      <style:text-properties fo:font-style="normal" officeooo:rsid="0558410b" style:font-style-asian="normal" style:font-style-complex="normal"/>
    </style:style>
    <style:style style:name="T387" style:family="text">
      <style:text-properties fo:font-style="normal" officeooo:rsid="08b981f3" style:font-style-asian="normal" style:font-style-complex="normal"/>
    </style:style>
    <style:style style:name="T388" style:family="text">
      <style:text-properties fo:color="#127622" loext:opacity="100%" style:font-name="Gabriela Nerd Font" fo:font-size="12pt" fo:language="en" fo:country="US" officeooo:rsid="0745d5a1" style:letter-kerning="false" style:font-name-asian="DejaVu Sans" style:font-size-asian="12pt" style:language-asian="zh" style:country-asian="CN" style:font-name-complex="Carlito" style:font-size-complex="12pt" style:language-complex="hi" style:country-complex="IN"/>
    </style:style>
    <style:style style:name="T389" style:family="text">
      <style:text-properties style:text-position="super 58%" style:font-name="Carlito" style:font-name-complex="Carlito"/>
    </style:style>
    <style:style style:name="T390" style:family="text">
      <style:text-properties style:font-name="Carlito" officeooo:rsid="05835d81" style:font-name-complex="Carlito"/>
    </style:style>
    <style:style style:name="T391" style:family="text">
      <style:text-properties style:font-name="Carlito" fo:font-size="12pt" fo:font-style="normal" fo:font-weight="normal" officeooo:rsid="0380182c" style:font-size-asian="12pt" style:font-style-asian="normal" style:font-weight-asian="normal" style:font-name-complex="Carlito" style:font-size-complex="12pt" style:font-style-complex="normal" style:font-weight-complex="normal"/>
    </style:style>
    <style:style style:name="T392" style:family="text">
      <style:text-properties style:font-name="Carlito" fo:font-size="12pt" fo:font-style="normal" fo:font-weight="normal" officeooo:rsid="05835d81" style:font-size-asian="12pt" style:font-style-asian="normal" style:font-weight-asian="normal" style:font-name-complex="Carlito" style:font-size-complex="12pt" style:font-style-complex="normal" style:font-weight-complex="normal"/>
    </style:style>
    <style:style style:name="T393" style:family="text">
      <style:text-properties style:font-name="Carlito" fo:font-size="12pt" fo:font-style="normal" fo:font-weight="normal" officeooo:rsid="06af5162" style:font-size-asian="12pt" style:font-style-asian="normal" style:font-weight-asian="normal" style:font-name-complex="Carlito" style:font-size-complex="12pt" style:font-style-complex="normal" style:font-weight-complex="normal"/>
    </style:style>
    <style:style style:name="T394" style:family="text">
      <style:text-properties style:use-window-font-color="true" loext:opacity="0%" style:font-name="Carlito" fo:font-size="12pt" fo:font-style="normal" fo:font-weight="normal" officeooo:rsid="0380182c" style:font-size-asian="12pt" style:font-style-asian="normal" style:font-weight-asian="normal" style:font-name-complex="Carlito" style:font-size-complex="12pt" style:font-style-complex="normal" style:font-weight-complex="normal"/>
    </style:style>
    <style:style style:name="T395" style:family="text">
      <style:text-properties style:use-window-font-color="true" loext:opacity="0%" style:font-name="Carlito" fo:font-size="12pt" fo:font-style="normal" fo:font-weight="normal" officeooo:rsid="08726895" style:font-size-asian="12pt" style:font-style-asian="normal" style:font-weight-asian="normal" style:font-name-complex="Carlito" style:font-size-complex="12pt" style:font-style-complex="normal" style:font-weight-complex="normal"/>
    </style:style>
    <style:style style:name="T396" style:family="text">
      <style:text-properties style:use-window-font-color="true" loext:opacity="0%" style:font-name="Carlito" fo:font-size="12pt" fo:font-style="normal" fo:font-weight="normal" officeooo:rsid="06af5162" style:font-size-asian="12pt" style:font-style-asian="normal" style:font-weight-asian="normal" style:font-name-complex="Carlito" style:font-size-complex="12pt" style:font-style-complex="normal" style:font-weight-complex="normal"/>
    </style:style>
    <style:style style:name="T397" style:family="text">
      <style:text-properties style:use-window-font-color="true" loext:opacity="0%" style:font-name="Carlito" fo:font-size="12pt" fo:font-style="normal" fo:font-weight="normal" officeooo:rsid="092e740e" style:font-size-asian="12pt" style:font-style-asian="normal" style:font-weight-asian="normal" style:font-name-complex="Carlito" style:font-size-complex="12pt" style:font-style-complex="normal" style:font-weight-complex="normal"/>
    </style:style>
    <style:style style:name="T398" style:family="text">
      <style:text-properties style:use-window-font-color="true" loext:opacity="0%" style:font-name="Carlito" fo:font-size="12pt" fo:font-style="normal" fo:font-weight="normal" officeooo:rsid="06af57f5" style:font-size-asian="12pt" style:font-style-asian="normal" style:font-weight-asian="normal" style:font-name-complex="Carlito" style:font-size-complex="12pt" style:font-style-complex="normal" style:font-weight-complex="normal"/>
    </style:style>
    <style:style style:name="T399" style:family="text">
      <style:text-properties style:use-window-font-color="true" loext:opacity="0%" style:font-name="Carlito" fo:font-size="12pt" fo:font-style="normal" fo:font-weight="normal" officeooo:rsid="0746ece6" style:font-size-asian="12pt" style:font-style-asian="normal" style:font-weight-asian="normal" style:font-name-complex="Carlito" style:font-size-complex="12pt" style:font-style-complex="normal" style:font-weight-complex="normal"/>
    </style:style>
    <style:style style:name="T400" style:family="text">
      <style:text-properties style:use-window-font-color="true" loext:opacity="0%" style:font-name="Carlito" fo:font-size="12pt" fo:font-style="normal" fo:font-weight="normal" officeooo:rsid="077bdf5c" style:font-size-asian="12pt" style:font-style-asian="normal" style:font-weight-asian="normal" style:font-name-complex="Carlito" style:font-size-complex="12pt" style:font-style-complex="normal" style:font-weight-complex="normal"/>
    </style:style>
    <style:style style:name="T401" style:family="text">
      <style:text-properties fo:font-style="normal" fo:font-weight="normal" officeooo:rsid="0380182c" style:font-style-asian="normal" style:font-weight-asian="normal" style:font-style-complex="normal" style:font-weight-complex="normal"/>
    </style:style>
    <style:style style:name="T402" style:family="text">
      <style:text-properties fo:font-style="normal" fo:font-weight="normal" style:font-style-asian="normal" style:font-weight-asian="normal" style:font-style-complex="normal" style:font-weight-complex="normal"/>
    </style:style>
    <style:style style:name="T403" style:family="text">
      <style:text-properties officeooo:rsid="0563919c"/>
    </style:style>
    <style:style style:name="T404" style:family="text">
      <style:text-properties fo:color="#a1467e" loext:opacity="100%"/>
    </style:style>
    <style:style style:name="T405" style:family="text">
      <style:text-properties fo:color="#a1467e" loext:opacity="100%" fo:background-color="#fff5ce" loext:char-shading-value="0"/>
    </style:style>
    <style:style style:name="T406" style:family="text">
      <style:text-properties fo:color="#2a6099" loext:opacity="100%" fo:background-color="#fff5ce" loext:char-shading-value="0"/>
    </style:style>
    <style:style style:name="T407" style:family="text">
      <style:text-properties fo:color="#2a6099" loext:opacity="100%"/>
    </style:style>
    <style:style style:name="T408" style:family="text">
      <style:text-properties fo:color="#b85c00" loext:opacity="100%"/>
    </style:style>
    <style:style style:name="T409" style:family="text">
      <style:text-properties fo:color="#355269" loext:opacity="100%"/>
    </style:style>
    <style:style style:name="T410" style:family="text">
      <style:text-properties style:font-name="Carlito" fo:background-color="#ffd8ce" loext:char-shading-value="0" style:font-name-complex="Carlito"/>
    </style:style>
    <style:style style:name="T411" style:family="text">
      <style:text-properties fo:font-size="12pt" fo:font-style="normal" fo:font-weight="normal" officeooo:rsid="028ea079" style:font-size-asian="12pt" style:font-style-asian="normal" style:font-weight-asian="normal" style:font-size-complex="12pt" style:font-style-complex="normal" style:font-weight-complex="normal"/>
    </style:style>
    <style:style style:name="T4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3" style:family="text">
      <style:text-properties fo:font-size="12pt" fo:font-style="normal" fo:font-weight="normal" officeooo:rsid="0878d3dc" style:font-size-asian="12pt" style:font-style-asian="normal" style:font-weight-asian="normal" style:font-size-complex="12pt" style:font-style-complex="normal" style:font-weight-complex="normal"/>
    </style:style>
    <style:style style:name="T414" style:family="text">
      <style:text-properties fo:font-size="12pt" fo:font-style="normal" fo:font-weight="normal" officeooo:rsid="087a0780" style:font-size-asian="12pt" style:font-style-asian="normal" style:font-weight-asian="normal" style:font-size-complex="12pt" style:font-style-complex="normal" style:font-weight-complex="normal"/>
    </style:style>
    <style:style style:name="T415" style:family="text">
      <style:text-properties fo:font-size="12pt" fo:font-style="normal" fo:font-weight="normal" officeooo:rsid="037974ee" style:font-size-asian="12pt" style:font-style-asian="normal" style:font-weight-asian="normal" style:font-size-complex="12pt" style:font-style-complex="normal" style:font-weight-complex="normal"/>
    </style:style>
    <style:style style:name="T416" style:family="text">
      <style:text-properties fo:font-size="12pt" fo:font-style="normal" fo:font-weight="normal" officeooo:rsid="08750b1f" style:font-size-asian="12pt" style:font-style-asian="normal" style:font-weight-asian="normal" style:font-size-complex="12pt" style:font-style-complex="normal" style:font-weight-complex="normal"/>
    </style:style>
    <style:style style:name="T417" style:family="text">
      <style:text-properties fo:font-style="normal" fo:font-weight="normal" officeooo:rsid="056b6470" style:font-style-asian="normal" style:font-weight-asian="normal" style:font-style-complex="normal" style:font-weight-complex="normal"/>
    </style:style>
    <style:style style:name="T418" style:family="text">
      <style:text-properties fo:font-style="normal" fo:font-weight="normal" officeooo:rsid="05127587" style:font-style-asian="normal" style:font-weight-asian="normal" style:font-style-complex="normal" style:font-weight-complex="normal"/>
    </style:style>
    <style:style style:name="T419" style:family="text">
      <style:text-properties fo:font-style="normal" fo:font-weight="normal" officeooo:rsid="056dc542" style:font-style-asian="normal" style:font-weight-asian="normal" style:font-style-complex="normal" style:font-weight-complex="normal"/>
    </style:style>
    <style:style style:name="T420" style:family="text">
      <style:text-properties fo:font-style="normal" fo:font-weight="normal" officeooo:rsid="056bca06" style:font-style-asian="normal" style:font-weight-asian="normal" style:font-style-complex="normal" style:font-weight-complex="normal"/>
    </style:style>
    <style:style style:name="T421" style:family="text">
      <style:text-properties fo:font-style="normal" fo:font-weight="normal" officeooo:rsid="087aad32" style:font-style-asian="normal" style:font-weight-asian="normal" style:font-style-complex="normal" style:font-weight-complex="normal"/>
    </style:style>
    <style:style style:name="T422" style:family="text">
      <style:text-properties fo:font-style="normal" fo:font-weight="normal" officeooo:rsid="08bf202c" style:font-style-asian="normal" style:font-weight-asian="normal" style:font-style-complex="normal" style:font-weight-complex="normal"/>
    </style:style>
    <style:style style:name="T423" style:family="text">
      <style:text-properties style:use-window-font-color="true" loext:opacity="0%" style:font-name="BlackChancery" fo:font-size="14pt" officeooo:rsid="067d56fa" style:font-size-asian="12.25pt" style:font-name-complex="Carlito" style:font-size-complex="14pt"/>
    </style:style>
    <style:style style:name="T424" style:family="text">
      <style:text-properties style:use-window-font-color="true" loext:opacity="0%" style:font-name="BlackChancery" fo:font-size="14pt" officeooo:rsid="074135cc" style:font-size-asian="12.25pt" style:font-name-complex="Carlito" style:font-size-complex="14pt"/>
    </style:style>
    <style:style style:name="T425" style:family="text">
      <style:text-properties style:use-window-font-color="true" loext:opacity="0%" fo:font-size="12pt" fo:font-weight="normal" style:font-size-asian="12pt" style:font-weight-asian="normal" style:font-size-complex="12pt" style:font-weight-complex="normal"/>
    </style:style>
    <style:style style:name="T426" style:family="text">
      <style:text-properties style:use-window-font-color="true" loext:opacity="0%" fo:font-size="12pt" fo:font-weight="normal" fo:background-color="#fff5ce" loext:char-shading-value="0" style:font-size-asian="12pt" style:font-weight-asian="normal" style:font-size-complex="12pt" style:font-weight-complex="normal"/>
    </style:style>
    <style:style style:name="T427" style:family="text">
      <style:text-properties style:use-window-font-color="true" loext:opacity="0%" fo:font-size="12pt" fo:font-weight="normal" fo:background-color="#ffdbb6" loext:char-shading-value="0" style:font-size-asian="12pt" style:font-weight-asian="normal" style:font-size-complex="12pt" style:font-weight-complex="normal"/>
    </style:style>
    <style:style style:name="T428" style:family="text">
      <style:text-properties style:use-window-font-color="true" loext:opacity="0%" fo:font-size="12pt" fo:font-weight="normal" officeooo:rsid="04d14b2c" style:font-size-asian="12pt" style:font-weight-asian="normal" style:font-size-complex="12pt" style:font-weight-complex="normal"/>
    </style:style>
    <style:style style:name="T429" style:family="text">
      <style:text-properties style:text-position="33% 80%"/>
    </style:style>
    <style:style style:name="T430" style:family="text">
      <style:text-properties style:text-position="super 58%" officeooo:rsid="04cbb33e" fo:background-color="transparent" loext:char-shading-value="0"/>
    </style:style>
    <style:style style:name="T431" style:family="text">
      <style:text-properties style:text-position="super 58%" officeooo:rsid="0675ff63" fo:background-color="transparent" loext:char-shading-value="0"/>
    </style:style>
    <style:style style:name="T432" style:family="text">
      <style:text-properties fo:color="#127622" loext:opacity="100%" style:text-position="super 58%" style:font-name="Gabriela Nerd Font" officeooo:rsid="0675ff63" fo:background-color="transparent" loext:char-shading-value="0"/>
    </style:style>
    <style:style style:name="T433" style:family="text">
      <style:text-properties style:use-window-font-color="true" loext:opacity="0%" officeooo:rsid="03c7f790"/>
    </style:style>
    <style:style style:name="T434" style:family="text">
      <style:text-properties style:use-window-font-color="true" loext:opacity="0%" style:font-name="Carlito" fo:font-size="12pt" officeooo:rsid="04e83243" style:font-size-asian="12pt" style:font-name-complex="Carlito" style:font-size-complex="12pt"/>
    </style:style>
    <style:style style:name="T435" style:family="text">
      <style:text-properties style:use-window-font-color="true" loext:opacity="0%" style:font-name="Carlito" fo:font-size="12pt" officeooo:rsid="04c31c14" style:font-size-asian="12pt" style:font-name-complex="Carlito" style:font-size-complex="12pt"/>
    </style:style>
    <style:style style:name="T436" style:family="text">
      <style:text-properties style:use-window-font-color="true" loext:opacity="0%" style:font-name="Carlito" fo:font-size="12pt" officeooo:rsid="06802dfc" style:font-size-asian="12pt" style:font-name-complex="Carlito" style:font-size-complex="12pt"/>
    </style:style>
    <style:style style:name="T437" style:family="text">
      <style:text-properties style:use-window-font-color="true" loext:opacity="0%" style:font-name="Carlito" fo:font-size="12pt" officeooo:rsid="0933e72f" style:font-size-asian="12pt" style:font-name-complex="Carlito" style:font-size-complex="12pt"/>
    </style:style>
    <style:style style:name="T438" style:family="text">
      <style:text-properties style:use-window-font-color="true" loext:opacity="0%" style:font-name="Carlito" fo:font-size="12pt" officeooo:rsid="04c9a06c" style:font-size-asian="12pt" style:font-name-complex="Carlito" style:font-size-complex="12pt"/>
    </style:style>
    <style:style style:name="T439" style:family="text">
      <style:text-properties style:use-window-font-color="true" loext:opacity="0%" style:font-name="Carlito" fo:font-size="12pt" officeooo:rsid="04c384cd" style:font-size-asian="12pt" style:font-name-complex="Carlito" style:font-size-complex="12pt"/>
    </style:style>
    <style:style style:name="T440" style:family="text">
      <style:text-properties style:use-window-font-color="true" loext:opacity="0%" style:font-name="Carlito" fo:font-size="12pt" officeooo:rsid="04c8355d" style:font-size-asian="12pt" style:font-name-complex="Carlito" style:font-size-complex="12pt"/>
    </style:style>
    <style:style style:name="T441" style:family="text">
      <style:text-properties style:use-window-font-color="true" loext:opacity="0%" style:font-name="Carlito" fo:font-size="12pt" officeooo:rsid="078a503c" style:font-size-asian="12pt" style:font-name-complex="Carlito" style:font-size-complex="12pt"/>
    </style:style>
    <style:style style:name="T442" style:family="text">
      <style:text-properties style:use-window-font-color="true" loext:opacity="0%" style:font-name="Carlito" fo:font-size="12pt" officeooo:rsid="04e88c5b" style:font-size-asian="12pt" style:font-name-complex="Carlito" style:font-size-complex="12pt"/>
    </style:style>
    <style:style style:name="T443" style:family="text">
      <style:text-properties style:use-window-font-color="true" loext:opacity="0%" style:font-name="Carlito" fo:font-size="12pt" officeooo:rsid="06821eb1" style:font-size-asian="12pt" style:font-name-complex="Carlito" style:font-size-complex="12pt"/>
    </style:style>
    <style:style style:name="T444" style:family="text">
      <style:text-properties style:use-window-font-color="true" loext:opacity="0%" style:font-name="Carlito" fo:font-size="12pt" officeooo:rsid="077e5f3f" style:font-size-asian="12pt" style:font-name-complex="Carlito" style:font-size-complex="12pt"/>
    </style:style>
    <style:style style:name="T445" style:family="text">
      <style:text-properties style:use-window-font-color="true" loext:opacity="0%" style:font-name="Carlito" fo:font-size="12pt" officeooo:rsid="0787351a" style:font-size-asian="12pt" style:font-name-complex="Carlito" style:font-size-complex="12pt"/>
    </style:style>
    <style:style style:name="T446" style:family="text">
      <style:text-properties fo:color="#127622" loext:opacity="100%" style:font-name="Gabriela Nerd Font" fo:font-size="12pt" fo:language="en" fo:country="US" officeooo:rsid="078960e6" style:letter-kerning="false" style:font-name-asian="DejaVu Sans" style:font-size-asian="12pt" style:language-asian="zh" style:country-asian="CN" style:font-name-complex="Carlito" style:font-size-complex="12pt" style:language-complex="hi" style:country-complex="IN"/>
    </style:style>
    <style:style style:name="T447" style:family="text">
      <style:text-properties style:use-window-font-color="true" loext:opacity="0%" style:font-name="Carlito" fo:font-size="12pt" officeooo:rsid="0787caf9" style:font-size-asian="12pt" style:font-name-complex="Carlito" style:font-size-complex="12pt"/>
    </style:style>
    <style:style style:name="T448" style:family="text">
      <style:text-properties style:use-window-font-color="true" loext:opacity="0%" style:font-name="Carlito" fo:font-size="12pt" officeooo:rsid="087e9078" style:font-size-asian="12pt" style:font-name-complex="Carlito" style:font-size-complex="12pt"/>
    </style:style>
    <style:style style:name="T449" style:family="text">
      <style:text-properties officeooo:rsid="077f58bc"/>
    </style:style>
    <style:style style:name="T450" style:family="text">
      <style:text-properties officeooo:rsid="077ef9c8"/>
    </style:style>
    <style:style style:name="T451" style:family="text">
      <style:text-properties officeooo:rsid="0683415b"/>
    </style:style>
    <style:style style:name="T452" style:family="text">
      <style:text-properties officeooo:rsid="07823557"/>
    </style:style>
    <style:style style:name="T453" style:family="text">
      <style:text-properties officeooo:rsid="078bdbaf"/>
    </style:style>
    <style:style style:name="T454" style:family="text">
      <style:text-properties officeooo:rsid="0780838d"/>
    </style:style>
    <style:style style:name="T455" style:family="text">
      <style:text-properties officeooo:rsid="09355446"/>
    </style:style>
    <style:style style:name="T456" style:family="text">
      <style:text-properties officeooo:rsid="060e420f"/>
    </style:style>
    <style:style style:name="T457" style:family="text">
      <style:text-properties style:font-name="Carlito" fo:font-size="12pt" officeooo:rsid="0114c042" style:font-size-asian="12pt" style:font-name-complex="Carlito" style:font-size-complex="12pt"/>
    </style:style>
    <style:style style:name="T458" style:family="text">
      <style:text-properties style:font-name="Carlito" fo:font-size="12pt" officeooo:rsid="03cb0c6c" style:font-size-asian="12pt" style:font-name-complex="Carlito" style:font-size-complex="12pt"/>
    </style:style>
    <style:style style:name="T459" style:family="text">
      <style:text-properties style:font-name="Carlito" fo:font-size="12pt" officeooo:rsid="04e92502" style:font-size-asian="12pt" style:font-name-complex="Carlito" style:font-size-complex="12pt"/>
    </style:style>
    <style:style style:name="T460" style:family="text">
      <style:text-properties style:font-name="Carlito" fo:font-size="12pt" officeooo:rsid="022c4b72" style:font-size-asian="12pt" style:font-name-complex="Carlito" style:font-size-complex="12pt"/>
    </style:style>
    <style:style style:name="T461" style:family="text">
      <style:text-properties style:font-name="Carlito" fo:font-size="12pt" officeooo:rsid="015547f1" style:font-size-asian="12pt" style:font-name-complex="Carlito" style:font-size-complex="12pt"/>
    </style:style>
    <style:style style:name="T462" style:family="text">
      <style:text-properties style:font-name="Carlito" fo:font-size="12pt" officeooo:rsid="04e99893" style:font-size-asian="12pt" style:font-name-complex="Carlito" style:font-size-complex="12pt"/>
    </style:style>
    <style:style style:name="T463" style:family="text">
      <style:text-properties style:font-name="Carlito" fo:font-size="12pt" officeooo:rsid="01157aca" style:font-size-asian="12pt" style:font-name-complex="Carlito" style:font-size-complex="12pt"/>
    </style:style>
    <style:style style:name="T464" style:family="text">
      <style:text-properties style:font-name="Carlito" fo:font-size="12pt" officeooo:rsid="088355e3" style:font-size-asian="12pt" style:font-name-complex="Carlito" style:font-size-complex="12pt"/>
    </style:style>
    <style:style style:name="T465" style:family="text">
      <style:text-properties style:font-name="Carlito" fo:font-size="12pt" officeooo:rsid="01367575" style:font-size-asian="12pt" style:font-name-complex="Carlito" style:font-size-complex="12pt"/>
    </style:style>
    <style:style style:name="T466" style:family="text">
      <style:text-properties style:font-name="Carlito" fo:font-size="12pt" officeooo:rsid="04ea8518" style:font-size-asian="12pt" style:font-name-complex="Carlito" style:font-size-complex="12pt"/>
    </style:style>
    <style:style style:name="T467" style:family="text">
      <style:text-properties fo:color="#ff0000" loext:opacity="100%" style:font-name="Carlito" fo:font-size="12pt" style:font-size-asian="12pt" style:font-name-complex="Carlito" style:font-size-complex="12pt"/>
    </style:style>
    <style:style style:name="T468" style:family="text">
      <style:text-properties style:use-window-font-color="true" loext:opacity="0%" style:text-position="super 58%" style:font-name="Carlito" fo:font-size="12pt" officeooo:rsid="01f5b351" style:font-size-asian="12pt" style:font-name-complex="Carlito" style:font-size-complex="12pt"/>
    </style:style>
    <style:style style:name="T469" style:family="text">
      <style:text-properties fo:color="#ff0000" loext:opacity="100%" style:font-name="Carlito" fo:font-size="12pt" fo:background-color="#fff5ce" loext:char-shading-value="0" style:font-size-asian="12pt" style:font-name-complex="Carlito" style:font-size-complex="12pt"/>
    </style:style>
    <style:style style:name="T470" style:family="text">
      <style:text-properties style:text-position="super 58%" style:font-name="Carlito" fo:font-size="12pt" officeooo:rsid="005ac9f3" style:font-size-asian="12pt" style:font-name-complex="Carlito" style:font-size-complex="12pt"/>
    </style:style>
    <style:style style:name="T471" style:family="text">
      <style:text-properties style:text-underline-style="solid" style:text-underline-width="auto" style:text-underline-color="font-color"/>
    </style:style>
    <style:style style:name="T472" style:family="text">
      <style:text-properties style:font-name="Carlito" fo:font-size="12pt" officeooo:rsid="022d4502" style:font-size-asian="12pt" style:font-name-complex="Carlito" style:font-size-complex="12pt"/>
    </style:style>
    <style:style style:name="T473" style:family="text">
      <style:text-properties style:font-name="Carlito" fo:font-size="12pt" officeooo:rsid="022dc2d3" style:font-size-asian="12pt" style:font-name-complex="Carlito" style:font-size-complex="12pt"/>
    </style:style>
    <style:style style:name="T474" style:family="text">
      <style:text-properties style:font-name="Carlito" fo:font-size="12pt" officeooo:rsid="04eaf6f5" style:font-size-asian="12pt" style:font-name-complex="Carlito" style:font-size-complex="12pt"/>
    </style:style>
    <style:style style:name="T475" style:family="text">
      <style:text-properties style:font-name="Carlito" fo:font-size="12pt" officeooo:rsid="060f4094" style:font-size-asian="12pt" style:font-name-complex="Carlito" style:font-size-complex="12pt"/>
    </style:style>
    <style:style style:name="T476" style:family="text">
      <style:text-properties style:font-name="Carlito" fo:font-size="12pt" officeooo:rsid="02bd0ca5" style:font-size-asian="12pt" style:font-name-complex="Carlito" style:font-size-complex="12pt"/>
    </style:style>
    <style:style style:name="T477" style:family="text">
      <style:text-properties style:font-name="Carlito" fo:font-size="12pt" officeooo:rsid="02b99ed4" style:font-size-asian="12pt" style:font-name-complex="Carlito" style:font-size-complex="12pt"/>
    </style:style>
    <style:style style:name="T478" style:family="text">
      <style:text-properties style:font-name="Carlito" fo:font-size="12pt" officeooo:rsid="02bc61c3" style:font-size-asian="12pt" style:font-name-complex="Carlito" style:font-size-complex="12pt"/>
    </style:style>
    <style:style style:name="T479" style:family="text">
      <style:text-properties style:font-name="Carlito" fo:font-size="12pt" officeooo:rsid="02baed32" style:font-size-asian="12pt" style:font-name-complex="Carlito" style:font-size-complex="12pt"/>
    </style:style>
    <style:style style:name="T480" style:family="text">
      <style:text-properties style:font-name="Carlito" fo:font-size="12pt" officeooo:rsid="02beaa0b" style:font-size-asian="12pt" style:font-name-complex="Carlito" style:font-size-complex="12pt"/>
    </style:style>
    <style:style style:name="T481" style:family="text">
      <style:text-properties style:font-name="Carlito" fo:font-size="12pt" officeooo:rsid="02bc9576" style:font-size-asian="12pt" style:font-name-complex="Carlito" style:font-size-complex="12pt"/>
    </style:style>
    <style:style style:name="T482" style:family="text">
      <style:text-properties style:font-name="Carlito" fo:font-size="12pt" officeooo:rsid="01165017" style:font-size-asian="12pt" style:font-name-complex="Carlito" style:font-size-complex="12pt"/>
    </style:style>
    <style:style style:name="T483" style:family="text">
      <style:text-properties style:font-name="Carlito" fo:font-size="12pt" officeooo:rsid="01179fba" style:font-size-asian="12pt" style:font-name-complex="Carlito" style:font-size-complex="12pt"/>
    </style:style>
    <style:style style:name="T484" style:family="text">
      <style:text-properties style:font-name="Carlito" fo:font-size="12pt" fo:font-style="italic" officeooo:rsid="01389b18" style:font-size-asian="12pt" style:font-style-asian="italic" style:font-name-complex="Carlito" style:font-size-complex="12pt" style:font-style-complex="italic"/>
    </style:style>
    <style:style style:name="T485" style:family="text">
      <style:text-properties style:font-name="Carlito" fo:font-size="12pt" fo:font-style="normal" officeooo:rsid="01389b18" style:font-size-asian="12pt" style:font-style-asian="normal" style:font-name-complex="Carlito" style:font-size-complex="12pt" style:font-style-complex="normal"/>
    </style:style>
    <style:style style:name="T486" style:family="text">
      <style:text-properties style:font-name="Carlito" fo:font-size="12pt" fo:font-style="normal" officeooo:rsid="015656f6" style:font-size-asian="12pt" style:font-style-asian="normal" style:font-name-complex="Carlito" style:font-size-complex="12pt" style:font-style-complex="normal"/>
    </style:style>
    <style:style style:name="T487" style:family="text">
      <style:text-properties style:font-name="Carlito" fo:font-size="12pt" fo:font-style="normal" officeooo:rsid="088be4b5" style:font-size-asian="12pt" style:font-style-asian="normal" style:font-name-complex="Carlito" style:font-size-complex="12pt" style:font-style-complex="normal"/>
    </style:style>
    <style:style style:name="T488" style:family="text">
      <style:text-properties style:font-name="Carlito" fo:font-size="12pt" fo:font-style="normal" officeooo:rsid="088d9f37" style:font-size-asian="12pt" style:font-style-asian="normal" style:font-name-complex="Carlito" style:font-size-complex="12pt" style:font-style-complex="normal"/>
    </style:style>
    <style:style style:name="T489" style:family="text">
      <style:text-properties style:font-name="Carlito" fo:font-size="12pt" fo:font-style="normal" officeooo:rsid="08908b45" style:font-size-asian="12pt" style:font-style-asian="normal" style:font-name-complex="Carlito" style:font-size-complex="12pt" style:font-style-complex="normal"/>
    </style:style>
    <style:style style:name="T490" style:family="text">
      <style:text-properties style:font-name="Carlito" fo:font-size="12pt" fo:font-style="normal" officeooo:rsid="08883b24" style:font-size-asian="12pt" style:font-style-asian="normal" style:font-name-complex="Carlito" style:font-size-complex="12pt" style:font-style-complex="normal"/>
    </style:style>
    <style:style style:name="T491" style:family="text">
      <style:text-properties style:font-name="Carlito" fo:font-size="12pt" fo:font-style="italic" officeooo:rsid="08883b24" style:font-size-asian="12pt" style:font-style-asian="italic" style:font-name-complex="Carlito" style:font-size-complex="12pt" style:font-style-complex="italic"/>
    </style:style>
    <style:style style:name="T492" style:family="text">
      <style:text-properties style:font-name="Carlito" fo:font-size="12pt" fo:font-style="normal" officeooo:rsid="088f5836" style:font-size-asian="12pt" style:font-style-asian="normal" style:font-name-complex="Carlito" style:font-size-complex="12pt" style:font-style-complex="normal"/>
    </style:style>
    <style:style style:name="T493" style:family="text">
      <style:text-properties style:font-name="Carlito" fo:font-size="12pt" fo:font-style="normal" officeooo:rsid="0938ae39" style:font-size-asian="12pt" style:font-style-asian="normal" style:font-name-complex="Carlito" style:font-size-complex="12pt" style:font-style-complex="normal"/>
    </style:style>
    <style:style style:name="T494" style:family="text">
      <style:text-properties style:font-name="Carlito" fo:font-size="12pt" fo:font-style="italic" officeooo:rsid="0938ae39" style:font-size-asian="12pt" style:font-style-asian="italic" style:font-name-complex="Carlito" style:font-size-complex="12pt" style:font-style-complex="italic"/>
    </style:style>
    <style:style style:name="T495" style:family="text">
      <style:text-properties style:font-name="Carlito" fo:font-size="12pt" fo:font-style="normal" officeooo:rsid="088e5a82" style:font-size-asian="12pt" style:font-style-asian="normal" style:font-name-complex="Carlito" style:font-size-complex="12pt" style:font-style-complex="normal"/>
    </style:style>
    <style:style style:name="T496" style:family="text">
      <style:text-properties style:font-name="Carlito" fo:font-size="12pt" fo:font-style="italic" officeooo:rsid="088e5a82" style:font-size-asian="12pt" style:font-style-asian="italic" style:font-name-complex="Carlito" style:font-size-complex="12pt" style:font-style-complex="italic"/>
    </style:style>
    <style:style style:name="T497" style:family="text">
      <style:text-properties style:font-name="Carlito" fo:font-size="12pt" fo:font-style="normal" officeooo:rsid="088fb757" style:font-size-asian="12pt" style:font-style-asian="normal" style:font-name-complex="Carlito" style:font-size-complex="12pt" style:font-style-complex="normal"/>
    </style:style>
    <style:style style:name="T498" style:family="text">
      <style:text-properties style:use-window-font-color="true" loext:opacity="0%" style:text-position="33% 80%" style:font-name="Carlito" fo:font-size="12pt" style:font-size-asian="12pt" style:font-name-complex="Carlito" style:font-size-complex="12pt"/>
    </style:style>
    <style:style style:name="T499" style:family="text">
      <style:text-properties style:font-name="Carlito" fo:font-size="12pt" fo:background-color="#ffbf00" loext:char-shading-value="0" style:font-size-asian="12pt" style:font-name-complex="Carlito" style:font-size-complex="12pt"/>
    </style:style>
    <style:style style:name="T500" style:family="text">
      <style:text-properties style:text-position="super 58%" style:font-name="Carlito" fo:font-size="12pt" officeooo:rsid="005ac9f3" fo:background-color="transparent" loext:char-shading-value="0" style:font-size-asian="12pt" style:font-name-complex="Carlito" style:font-size-complex="12pt"/>
    </style:style>
    <style:style style:name="T501" style:family="text">
      <style:text-properties style:use-window-font-color="true" loext:opacity="0%" style:text-position="33% 80%" style:font-name="Carlito" fo:font-size="12pt" officeooo:rsid="0062deab" style:font-size-asian="12pt" style:font-name-complex="Carlito" style:font-size-complex="12pt"/>
    </style:style>
    <style:style style:name="T502" style:family="text">
      <style:text-properties officeooo:rsid="02551727"/>
    </style:style>
    <style:style style:name="T503" style:family="text">
      <style:text-properties officeooo:rsid="01186430"/>
    </style:style>
    <style:style style:name="T504" style:family="text">
      <style:text-properties style:text-position="super 58%" officeooo:rsid="013a7780"/>
    </style:style>
    <style:style style:name="T505" style:family="text">
      <style:text-properties officeooo:rsid="02c2c3ce"/>
    </style:style>
    <style:style style:name="T506" style:family="text">
      <style:text-properties officeooo:rsid="0886da6a"/>
    </style:style>
    <style:style style:name="T507" style:family="text">
      <style:text-properties officeooo:rsid="0256024a"/>
    </style:style>
    <style:style style:name="T508" style:family="text">
      <style:text-properties officeooo:rsid="011a5167"/>
    </style:style>
    <style:style style:name="T509" style:family="text">
      <style:text-properties officeooo:rsid="04f1048f"/>
    </style:style>
    <style:style style:name="T510" style:family="text">
      <style:text-properties officeooo:rsid="08863a5e"/>
    </style:style>
    <style:style style:name="T511" style:family="text">
      <style:text-properties style:font-name="Carlito" fo:font-size="12pt" officeooo:rsid="00649617" style:font-size-asian="12pt" style:font-name-complex="Carlito" style:font-size-complex="12pt"/>
    </style:style>
    <style:style style:name="T512" style:family="text">
      <style:text-properties style:font-name="Carlito" fo:font-size="12pt" officeooo:rsid="0064834c" style:font-size-asian="12pt" style:font-name-complex="Carlito" style:font-size-complex="12pt"/>
    </style:style>
    <style:style style:name="T513" style:family="text">
      <style:text-properties style:font-name="Carlito" fo:font-size="12pt" officeooo:rsid="006bf786" style:font-size-asian="12pt" style:font-name-complex="Carlito" style:font-size-complex="12pt"/>
    </style:style>
    <style:style style:name="T514" style:family="text">
      <style:text-properties style:font-name="Carlito" fo:font-size="12pt" officeooo:rsid="00691b02" style:font-size-asian="12pt" style:font-name-complex="Carlito" style:font-size-complex="12pt"/>
    </style:style>
    <style:style style:name="T515" style:family="text">
      <style:text-properties style:font-name="Carlito" fo:font-size="12pt" officeooo:rsid="02376006" style:font-size-asian="12pt" style:font-name-complex="Carlito" style:font-size-complex="12pt"/>
    </style:style>
    <style:style style:name="T516" style:family="text">
      <style:text-properties style:font-name="Carlito" fo:font-size="12pt" fo:font-style="italic" style:font-size-asian="12pt" style:font-name-complex="Carlito" style:font-size-complex="12pt"/>
    </style:style>
    <style:style style:name="T517" style:family="text">
      <style:text-properties style:font-name="Carlito" fo:font-size="12pt" fo:font-weight="normal" officeooo:rsid="013fc3e7" style:font-size-asian="12pt" style:font-weight-asian="normal" style:font-name-complex="Carlito" style:font-size-complex="12pt" style:font-weight-complex="normal"/>
    </style:style>
    <style:style style:name="T518" style:family="text">
      <style:text-properties style:font-name="Carlito" fo:font-size="12pt" fo:font-weight="normal" officeooo:rsid="013e3a07" style:font-size-asian="12pt" style:font-weight-asian="normal" style:font-name-complex="Carlito" style:font-size-complex="12pt" style:font-weight-complex="normal"/>
    </style:style>
    <style:style style:name="T519" style:family="text">
      <style:text-properties style:font-name="Carlito" fo:font-size="12pt" fo:font-weight="normal" officeooo:rsid="0140e6b2" style:font-size-asian="12pt" style:font-weight-asian="normal" style:font-name-complex="Carlito" style:font-size-complex="12pt" style:font-weight-complex="normal"/>
    </style:style>
    <style:style style:name="T520" style:family="text">
      <style:text-properties style:font-name="Carlito" fo:font-size="12pt" fo:font-weight="normal" officeooo:rsid="08921c54" style:font-size-asian="12pt" style:font-weight-asian="normal" style:font-name-complex="Carlito" style:font-size-complex="12pt" style:font-weight-complex="normal"/>
    </style:style>
    <style:style style:name="T521" style:family="text">
      <style:text-properties style:font-name="Carlito" fo:font-size="12pt" officeooo:rsid="00787774" style:font-size-asian="12pt" style:font-name-complex="Carlito" style:font-size-complex="12pt"/>
    </style:style>
    <style:style style:name="T522" style:family="text">
      <style:text-properties style:font-name="Carlito" fo:font-size="12pt" fo:font-weight="normal" officeooo:rsid="00787774" style:font-size-asian="12pt" style:font-weight-asian="normal" style:font-name-complex="Carlito" style:font-size-complex="12pt" style:font-weight-complex="normal"/>
    </style:style>
    <style:style style:name="T523" style:family="text">
      <style:text-properties style:font-name="Carlito" fo:font-size="12pt" fo:font-weight="normal" officeooo:rsid="013b2651" style:font-size-asian="12pt" style:font-weight-asian="normal" style:font-name-complex="Carlito" style:font-size-complex="12pt" style:font-weight-complex="normal"/>
    </style:style>
    <style:style style:name="T524" style:family="text">
      <style:text-properties style:font-name="Carlito" fo:font-size="12pt" fo:font-weight="normal" officeooo:rsid="01f7e147" style:font-size-asian="12pt" style:font-weight-asian="normal" style:font-name-complex="Carlito" style:font-size-complex="12pt" style:font-weight-complex="normal"/>
    </style:style>
    <style:style style:name="T525" style:family="text">
      <style:text-properties style:font-name="Carlito" fo:font-size="12pt" officeooo:rsid="014999d8" style:font-size-asian="12pt" style:font-name-complex="Carlito" style:font-size-complex="12pt"/>
    </style:style>
    <style:style style:name="T526" style:family="text">
      <style:text-properties style:font-name="Carlito" fo:font-size="12pt" officeooo:rsid="014bcd92" style:font-size-asian="12pt" style:font-name-complex="Carlito" style:font-size-complex="12pt"/>
    </style:style>
    <style:style style:name="T527" style:family="text">
      <style:text-properties style:font-name="Carlito" fo:font-size="12pt" officeooo:rsid="00c699ae" style:font-size-asian="12pt" style:font-name-complex="Carlito" style:font-size-complex="12pt"/>
    </style:style>
    <style:style style:name="T528" style:family="text">
      <style:text-properties style:font-name="Carlito" fo:font-size="12pt" officeooo:rsid="0158cd1b" style:font-size-asian="12pt" style:font-name-complex="Carlito" style:font-size-complex="12pt"/>
    </style:style>
    <style:style style:name="T529" style:family="text">
      <style:text-properties style:font-name="Carlito" fo:font-size="12pt" officeooo:rsid="01599d11" style:font-size-asian="12pt" style:font-name-complex="Carlito" style:font-size-complex="12pt"/>
    </style:style>
    <style:style style:name="T530" style:family="text">
      <style:text-properties style:font-name="Carlito" fo:font-size="12pt" officeooo:rsid="01f88e64" style:font-size-asian="12pt" style:font-name-complex="Carlito" style:font-size-complex="12pt"/>
    </style:style>
    <style:style style:name="T531" style:family="text">
      <style:text-properties style:font-name="Carlito" fo:font-size="12pt" officeooo:rsid="03cc00fc" style:font-size-asian="12pt" style:font-name-complex="Carlito" style:font-size-complex="12pt"/>
    </style:style>
    <style:style style:name="T532" style:family="text">
      <style:text-properties officeooo:rsid="0539340e"/>
    </style:style>
    <style:style style:name="T533" style:family="text">
      <style:text-properties style:font-name="Carlito" fo:font-size="12pt" fo:font-weight="bold" style:font-size-asian="12pt" style:font-weight-asian="bold" style:font-name-complex="Carlito" style:font-size-complex="12pt" style:font-weight-complex="bold"/>
    </style:style>
    <style:style style:name="T534" style:family="text">
      <style:text-properties style:font-name="Carlito" fo:font-size="12pt" fo:font-weight="normal" fo:background-color="#fff5ce" loext:char-shading-value="0" style:font-size-asian="12pt" style:font-weight-asian="normal" style:font-name-complex="Carlito" style:font-size-complex="12pt" style:font-weight-complex="normal"/>
    </style:style>
    <style:style style:name="T535" style:family="text">
      <style:text-properties style:text-position="super 58%" style:font-name="Carlito" fo:font-size="12pt" fo:font-weight="normal" officeooo:rsid="005e0660" style:font-size-asian="12pt" style:font-weight-asian="normal" style:font-name-complex="Carlito" style:font-size-complex="12pt" style:font-weight-complex="normal"/>
    </style:style>
    <style:style style:name="T536" style:family="text">
      <style:text-properties style:text-position="super 58%" style:font-name="Carlito" fo:font-size="12pt" officeooo:rsid="005e0660" style:font-size-asian="12pt" style:font-name-complex="Carlito" style:font-size-complex="12pt"/>
    </style:style>
    <style:style style:name="T537" style:family="text">
      <style:text-properties officeooo:rsid="0131c6f4"/>
    </style:style>
    <style:style style:name="T538" style:family="text">
      <style:text-properties officeooo:rsid="04f63f27"/>
    </style:style>
    <style:style style:name="T539" style:family="text">
      <style:text-properties officeooo:rsid="0064834c"/>
    </style:style>
    <style:style style:name="T540" style:family="text">
      <style:text-properties fo:font-weight="normal" officeooo:rsid="00a9f26a" style:font-weight-asian="normal" style:font-weight-complex="normal"/>
    </style:style>
    <style:style style:name="T541" style:family="text">
      <style:text-properties fo:font-weight="normal" officeooo:rsid="00d13613" style:font-weight-asian="normal" style:font-weight-complex="normal"/>
    </style:style>
    <style:style style:name="T542" style:family="text">
      <style:text-properties fo:font-weight="normal" officeooo:rsid="025be76b" style:font-weight-asian="normal" style:font-weight-complex="normal"/>
    </style:style>
    <style:style style:name="T543" style:family="text">
      <style:text-properties fo:font-weight="normal" officeooo:rsid="025aff1c" style:font-weight-asian="normal" style:font-weight-complex="normal"/>
    </style:style>
    <style:style style:name="T544" style:family="text">
      <style:text-properties officeooo:rsid="035bf20d"/>
    </style:style>
    <style:style style:name="T545" style:family="text">
      <style:text-properties officeooo:rsid="093dc2fd"/>
    </style:style>
    <style:style style:name="T546" style:family="text">
      <style:text-properties officeooo:rsid="07941252"/>
    </style:style>
    <style:style style:name="T547" style:family="text">
      <style:text-properties officeooo:rsid="04f97600"/>
    </style:style>
    <style:style style:name="T548" style:family="text">
      <style:text-properties officeooo:rsid="04f87bc7"/>
    </style:style>
    <style:style style:name="T549" style:family="text">
      <style:text-properties style:font-name="Carlito" fo:font-size="12pt" fo:font-weight="normal" officeooo:rsid="025dde79" style:font-size-asian="12pt" style:font-weight-asian="normal" style:font-name-complex="Carlito" style:font-size-complex="12pt" style:font-weight-complex="normal"/>
    </style:style>
    <style:style style:name="T550" style:family="text">
      <style:text-properties style:font-name="Carlito" fo:font-size="12pt" fo:font-weight="normal" officeooo:rsid="02518218" style:font-size-asian="12pt" style:font-weight-asian="normal" style:font-name-complex="Carlito" style:font-size-complex="12pt" style:font-weight-complex="normal"/>
    </style:style>
    <style:style style:name="T551" style:family="text">
      <style:text-properties style:font-name="Carlito" fo:font-size="12pt" fo:font-weight="normal" officeooo:rsid="025a8c7e" style:font-size-asian="12pt" style:font-weight-asian="normal" style:font-name-complex="Carlito" style:font-size-complex="12pt" style:font-weight-complex="normal"/>
    </style:style>
    <style:style style:name="T552" style:family="text">
      <style:text-properties style:font-name="Carlito" fo:font-size="12pt" fo:font-weight="normal" officeooo:rsid="02591608" style:font-size-asian="12pt" style:font-weight-asian="normal" style:font-name-complex="Carlito" style:font-size-complex="12pt" style:font-weight-complex="normal"/>
    </style:style>
    <style:style style:name="T553" style:family="text">
      <style:text-properties style:font-name="Carlito" fo:font-size="12pt" fo:font-weight="normal" officeooo:rsid="069283ea" style:font-size-asian="12pt" style:font-weight-asian="normal" style:font-name-complex="Carlito" style:font-size-complex="12pt" style:font-weight-complex="normal"/>
    </style:style>
    <style:style style:name="T554" style:family="text">
      <style:text-properties fo:font-weight="normal" officeooo:rsid="02591608" style:font-weight-asian="normal" style:font-weight-complex="normal"/>
    </style:style>
    <style:style style:name="T555" style:family="text">
      <style:text-properties officeooo:rsid="08bfe0ce"/>
    </style:style>
    <style:style style:name="T556" style:family="text">
      <style:text-properties fo:color="#ff0000" loext:opacity="100%" officeooo:rsid="06942260"/>
    </style:style>
    <style:style style:name="T557" style:family="text">
      <style:text-properties officeooo:rsid="06942260"/>
    </style:style>
    <style:style style:name="T558" style:family="text">
      <style:text-properties style:font-name="BlackChancery" fo:font-size="14pt" fo:font-style="normal" style:text-underline-style="none" fo:font-weight="normal" style:font-size-asian="14pt" style:font-style-asian="normal" style:font-weight-asian="normal" style:font-name-complex="Carlito" style:font-size-complex="14pt" style:font-style-complex="normal" style:font-weight-complex="normal"/>
    </style:style>
    <style:style style:name="T559" style:family="text">
      <style:text-properties style:font-name="BlackChancery" fo:font-size="14pt" fo:font-style="normal" style:text-underline-style="none" fo:font-weight="normal" officeooo:rsid="0941864f" style:font-size-asian="14pt" style:font-style-asian="normal" style:font-weight-asian="normal" style:font-name-complex="Carlito" style:font-size-complex="14pt" style:font-style-complex="normal" style:font-weight-complex="normal"/>
    </style:style>
    <style:style style:name="T560" style:family="text">
      <style:text-properties officeooo:rsid="070d0ec5"/>
    </style:style>
    <style:style style:name="T561" style:family="text">
      <style:text-properties style:use-window-font-color="true" loext:opacity="0%" style:font-name="Carlito" fo:font-size="12pt" fo:font-weight="normal" officeooo:rsid="0323a125" style:font-size-asian="12pt" style:font-weight-asian="normal" style:font-name-complex="Carlito" style:font-size-complex="12pt" style:font-weight-complex="normal"/>
    </style:style>
    <style:style style:name="T562" style:family="text">
      <style:text-properties style:use-window-font-color="true" loext:opacity="0%" style:font-name="Carlito" fo:font-size="12pt" fo:font-weight="normal" officeooo:rsid="0494f4ef" style:font-size-asian="12pt" style:font-weight-asian="normal" style:font-name-complex="Carlito" style:font-size-complex="12pt" style:font-weight-complex="normal"/>
    </style:style>
    <style:style style:name="T563" style:family="text">
      <style:text-properties style:use-window-font-color="true" loext:opacity="0%" style:font-name="Carlito" fo:font-size="12pt" fo:font-weight="normal" officeooo:rsid="04921c8e" style:font-size-asian="12pt" style:font-weight-asian="normal" style:font-name-complex="Carlito" style:font-size-complex="12pt" style:font-weight-complex="normal"/>
    </style:style>
    <style:style style:name="T564" style:family="text">
      <style:text-properties style:use-window-font-color="true" loext:opacity="0%" style:font-name="Carlito" fo:font-size="12pt" fo:font-weight="normal" officeooo:rsid="04925f81" style:font-size-asian="12pt" style:font-weight-asian="normal" style:font-name-complex="Carlito" style:font-size-complex="12pt" style:font-weight-complex="normal"/>
    </style:style>
    <style:style style:name="T565" style:family="text">
      <style:text-properties style:use-window-font-color="true" loext:opacity="0%" style:font-name="Carlito" fo:font-size="12pt" fo:font-weight="normal" officeooo:rsid="04931b8e" style:font-size-asian="12pt" style:font-weight-asian="normal" style:font-name-complex="Carlito" style:font-size-complex="12pt" style:font-weight-complex="normal"/>
    </style:style>
    <style:style style:name="T566" style:family="text">
      <style:text-properties style:use-window-font-color="true" loext:opacity="0%" style:font-name="Carlito" fo:font-size="12pt" fo:font-weight="normal" officeooo:rsid="04933758" style:font-size-asian="12pt" style:font-weight-asian="normal" style:font-name-complex="Carlito" style:font-size-complex="12pt" style:font-weight-complex="normal"/>
    </style:style>
    <style:style style:name="T567" style:family="text">
      <style:text-properties style:use-window-font-color="true" loext:opacity="0%" style:font-name="Carlito" fo:font-size="12pt" fo:font-weight="normal" officeooo:rsid="0493b237" style:font-size-asian="12pt" style:font-weight-asian="normal" style:font-name-complex="Carlito" style:font-size-complex="12pt" style:font-weight-complex="normal"/>
    </style:style>
    <style:style style:name="T568" style:family="text">
      <style:text-properties style:font-name="BlackChancery" fo:font-size="14pt" fo:font-style="normal" style:text-underline-style="none" fo:font-weight="normal" officeooo:rsid="048e637a" style:font-size-asian="14pt" style:font-style-asian="normal" style:font-weight-asian="normal" style:font-name-complex="Carlito" style:font-size-complex="14pt" style:font-style-complex="normal" style:font-weight-complex="normal"/>
    </style:style>
    <style:style style:name="T569" style:family="text">
      <style:text-properties style:font-name="BlackChancery" fo:font-size="14pt" fo:font-style="normal" style:text-underline-style="none" fo:font-weight="normal" officeooo:rsid="09478dd1" style:font-size-asian="14pt" style:font-style-asian="normal" style:font-weight-asian="normal" style:font-name-complex="Carlito" style:font-size-complex="14pt" style:font-style-complex="normal" style:font-weight-complex="normal"/>
    </style:style>
    <style:style style:name="T570" style:family="text">
      <style:text-properties style:use-window-font-color="true" loext:opacity="0%" style:font-name="Carlito" fo:font-size="12pt" fo:font-style="normal" style:text-underline-style="none" fo:font-weight="normal" officeooo:rsid="08988189" style:font-size-asian="12pt" style:font-style-asian="normal" style:font-weight-asian="normal" style:font-name-complex="Carlito" style:font-size-complex="12pt" style:font-style-complex="normal" style:font-weight-complex="normal"/>
    </style:style>
    <style:style style:name="T571" style:family="text">
      <style:text-properties style:use-window-font-color="true" loext:opacity="0%" style:font-name="Carlito" fo:font-size="12pt" fo:font-style="normal" style:text-underline-style="none" fo:font-weight="normal" officeooo:rsid="030d32ca" style:font-size-asian="12pt" style:font-style-asian="normal" style:font-weight-asian="normal" style:font-name-complex="Carlito" style:font-size-complex="12pt" style:font-style-complex="normal" style:font-weight-complex="normal"/>
    </style:style>
    <style:style style:name="T572" style:family="text">
      <style:text-properties style:use-window-font-color="true" loext:opacity="0%" style:font-name="Carlito" fo:font-size="12pt" fo:font-style="normal" style:text-underline-style="none" fo:font-weight="normal" officeooo:rsid="089905f9" style:font-size-asian="12pt" style:font-style-asian="normal" style:font-weight-asian="normal" style:font-name-complex="Carlito" style:font-size-complex="12pt" style:font-style-complex="normal" style:font-weight-complex="normal"/>
    </style:style>
    <style:style style:name="T573" style:family="text">
      <style:text-properties style:use-window-font-color="true" loext:opacity="0%" style:font-name="Carlito" fo:font-size="12pt" fo:font-style="normal" style:text-underline-style="none" fo:font-weight="normal" officeooo:rsid="04961518" style:font-size-asian="12pt" style:font-style-asian="normal" style:font-weight-asian="normal" style:font-name-complex="Carlito" style:font-size-complex="12pt" style:font-style-complex="normal" style:font-weight-complex="normal"/>
    </style:style>
    <style:style style:name="T574" style:family="text">
      <style:text-properties style:use-window-font-color="true" loext:opacity="0%" style:font-name="Carlito" fo:font-size="12pt" fo:font-style="normal" style:text-underline-style="none" fo:font-weight="normal" officeooo:rsid="08c2a176" style:font-size-asian="12pt" style:font-style-asian="normal" style:font-weight-asian="normal" style:font-name-complex="Carlito" style:font-size-complex="12pt" style:font-style-complex="normal" style:font-weight-complex="normal"/>
    </style:style>
    <style:style style:name="T575" style:family="text">
      <style:text-properties style:use-window-font-color="true" loext:opacity="0%" style:font-name="Carlito" fo:font-size="12pt" fo:font-style="italic" style:text-underline-style="none" fo:font-weight="normal" officeooo:rsid="08e00237" style:font-size-asian="12pt" style:font-style-asian="italic" style:font-weight-asian="normal" style:font-name-complex="Carlito" style:font-size-complex="12pt" style:font-style-complex="italic" style:font-weight-complex="normal"/>
    </style:style>
    <style:style style:name="T576" style:family="text">
      <style:text-properties style:use-window-font-color="true" loext:opacity="0%" style:font-name="Carlito" fo:font-size="12pt" fo:font-style="normal" style:text-underline-style="none" fo:font-weight="normal" officeooo:rsid="08e00237" style:font-size-asian="12pt" style:font-style-asian="normal" style:font-weight-asian="normal" style:font-name-complex="Carlito" style:font-size-complex="12pt" style:font-style-complex="normal" style:font-weight-complex="normal"/>
    </style:style>
    <style:style style:name="T577" style:family="text">
      <style:text-properties style:use-window-font-color="true" loext:opacity="0%" style:font-name="Carlito" fo:font-size="12pt" fo:font-style="italic" style:text-underline-style="none" fo:font-weight="normal" officeooo:rsid="089905f9" style:font-size-asian="12pt" style:font-style-asian="italic" style:font-weight-asian="normal" style:font-name-complex="Carlito" style:font-size-complex="12pt" style:font-style-complex="italic" style:font-weight-complex="normal"/>
    </style:style>
    <style:style style:name="T578" style:family="text">
      <style:text-properties style:use-window-font-color="true" loext:opacity="0%" style:font-name="Carlito" fo:font-size="12pt" fo:font-style="normal" style:text-underline-style="none" fo:font-weight="normal" officeooo:rsid="089a5e89" style:font-size-asian="12pt" style:font-style-asian="normal" style:font-weight-asian="normal" style:font-name-complex="Carlito" style:font-size-complex="12pt" style:font-style-complex="normal" style:font-weight-complex="normal"/>
    </style:style>
    <style:style style:name="T579" style:family="text">
      <style:text-properties style:use-window-font-color="true" loext:opacity="0%" style:font-name="Carlito" fo:font-size="12pt" fo:font-style="normal" style:text-underline-style="none" fo:font-weight="normal" officeooo:rsid="09495631" style:font-size-asian="12pt" style:font-style-asian="normal" style:font-weight-asian="normal" style:font-name-complex="Carlito" style:font-size-complex="12pt" style:font-style-complex="normal" style:font-weight-complex="normal"/>
    </style:style>
    <style:style style:name="T580" style:family="text">
      <style:text-properties style:use-window-font-color="true" loext:opacity="0%" style:font-name="Carlito" fo:font-size="12pt" fo:font-style="normal" style:text-underline-style="none" fo:font-weight="normal" officeooo:rsid="089a4a3a" style:font-size-asian="12pt" style:font-style-asian="normal" style:font-weight-asian="normal" style:font-name-complex="Carlito" style:font-size-complex="12pt" style:font-style-complex="normal" style:font-weight-complex="normal"/>
    </style:style>
    <style:style style:name="T581" style:family="text">
      <style:text-properties fo:color="#127622" loext:opacity="100%" style:font-name="Gabriela Nerd Font" fo:font-size="12pt" fo:language="en" fo:country="US" fo:font-style="normal" style:text-underline-style="none" fo:font-weight="normal" officeooo:rsid="04553ef7" style:letter-kerning="false" style:font-name-asian="DejaVu Sans" style:font-size-asian="12pt" style:language-asian="zh" style:country-asian="CN" style:font-style-asian="normal" style:font-weight-asian="normal" style:font-name-complex="Carlito" style:font-size-complex="12pt" style:language-complex="hi" style:country-complex="IN" style:font-style-complex="normal" style:font-weight-complex="normal"/>
    </style:style>
    <style:style style:name="T582" style:family="text">
      <style:text-properties style:use-window-font-color="true" loext:opacity="0%" style:font-name="Carlito" fo:font-size="12pt" fo:font-style="normal" style:text-underline-style="none" fo:font-weight="normal" officeooo:rsid="089bdb1c" style:font-size-asian="12pt" style:font-style-asian="normal" style:font-weight-asian="normal" style:font-name-complex="Carlito" style:font-size-complex="12pt" style:font-style-complex="normal" style:font-weight-complex="normal"/>
    </style:style>
    <style:style style:name="T583" style:family="text">
      <style:text-properties style:use-window-font-color="true" loext:opacity="0%" style:font-name="Carlito" fo:font-size="12pt" fo:font-style="normal" style:text-underline-style="none" fo:font-weight="normal" officeooo:rsid="089bfce0" style:font-size-asian="12pt" style:font-style-asian="normal" style:font-weight-asian="normal" style:font-name-complex="Carlito" style:font-size-complex="12pt" style:font-style-complex="normal" style:font-weight-complex="normal"/>
    </style:style>
    <style:style style:name="T584" style:family="text">
      <style:text-properties officeooo:rsid="089bdb1c"/>
    </style:style>
    <style:style style:name="T585" style:family="text">
      <style:text-properties officeooo:rsid="08c66bc2"/>
    </style:style>
    <style:style style:name="T586" style:family="text">
      <style:text-properties style:use-window-font-color="true" loext:opacity="0%" style:font-name="Carlito" fo:font-size="12pt" fo:font-style="normal" style:text-underline-style="none" fo:font-weight="normal" officeooo:rsid="0642260f" style:font-size-asian="12pt" style:font-style-asian="normal" style:font-weight-asian="normal" style:font-name-complex="Carlito" style:font-size-complex="12pt" style:font-style-complex="normal" style:font-weight-complex="normal"/>
    </style:style>
    <style:style style:name="T587" style:family="text">
      <style:text-properties style:use-window-font-color="true" loext:opacity="0%" style:font-name="Carlito" fo:font-size="12pt" fo:font-style="normal" style:text-underline-style="none" fo:font-weight="normal" officeooo:rsid="089c6d9f" style:font-size-asian="12pt" style:font-style-asian="normal" style:font-weight-asian="normal" style:font-name-complex="Carlito" style:font-size-complex="12pt" style:font-style-complex="normal" style:font-weight-complex="normal"/>
    </style:style>
    <style:style style:name="T588" style:family="text">
      <style:text-properties style:use-window-font-color="true" loext:opacity="0%" style:font-name="BlackChancery" fo:font-size="14pt" fo:font-style="normal" fo:font-weight="normal" officeooo:rsid="05395878" style:font-size-asian="12.25pt" style:font-style-asian="normal" style:font-weight-asian="normal" style:font-name-complex="Carlito" style:font-size-complex="14pt" style:font-style-complex="normal" style:font-weight-complex="normal"/>
    </style:style>
    <style:style style:name="T589" style:family="text">
      <style:text-properties style:use-window-font-color="true" loext:opacity="0%" fo:font-style="normal" fo:font-weight="normal" style:font-style-asian="normal" style:font-weight-asian="normal" style:font-style-complex="normal" style:font-weight-complex="normal"/>
    </style:style>
    <style:style style:name="T590" style:family="text">
      <style:text-properties style:font-name="Carlito" fo:font-size="12pt" fo:font-weight="normal" officeooo:rsid="00a9f26a" style:font-size-asian="12pt" style:font-weight-asian="normal" style:font-name-complex="Carlito" style:font-size-complex="12pt" style:font-weight-complex="normal"/>
    </style:style>
    <style:style style:name="T591" style:family="text">
      <style:text-properties style:font-name="Carlito" fo:font-size="12pt" fo:font-weight="normal" officeooo:rsid="028c9c94" style:font-size-asian="12pt" style:font-weight-asian="normal" style:font-name-complex="Carlito" style:font-size-complex="12pt" style:font-weight-complex="normal"/>
    </style:style>
    <style:style style:name="T592" style:family="text">
      <style:text-properties style:font-name="Carlito" fo:font-size="12pt" fo:font-weight="normal" officeooo:rsid="08fcb72e" style:font-size-asian="12pt" style:font-weight-asian="normal" style:font-name-complex="Carlito" style:font-size-complex="12pt" style:font-weight-complex="normal"/>
    </style:style>
    <style:style style:name="T593" style:family="text">
      <style:text-properties style:font-name="Carlito" fo:font-size="12pt" fo:font-weight="normal" officeooo:rsid="0368411a" style:font-size-asian="12pt" style:font-weight-asian="normal" style:font-name-complex="Carlito" style:font-size-complex="12pt" style:font-weight-complex="normal"/>
    </style:style>
    <style:style style:name="T594" style:family="text">
      <style:text-properties style:font-name="Carlito" fo:font-size="12pt" fo:font-weight="normal" officeooo:rsid="09497e5e" style:font-size-asian="12pt" style:font-weight-asian="normal" style:font-name-complex="Carlito" style:font-size-complex="12pt" style:font-weight-complex="normal"/>
    </style:style>
    <style:style style:name="T595" style:family="text">
      <style:text-properties style:font-name="Carlito" fo:font-size="12pt" fo:font-weight="normal" officeooo:rsid="089da75c" style:font-size-asian="12pt" style:font-weight-asian="normal" style:font-name-complex="Carlito" style:font-size-complex="12pt" style:font-weight-complex="normal"/>
    </style:style>
    <style:style style:name="T596" style:family="text">
      <style:text-properties style:font-name="Carlito" fo:font-size="12pt" fo:font-style="normal" fo:font-weight="normal" officeooo:rsid="0368411a" style:font-size-asian="12pt" style:font-style-asian="normal" style:font-weight-asian="normal" style:font-name-complex="Carlito" style:font-size-complex="12pt" style:font-style-complex="normal" style:font-weight-complex="normal"/>
    </style:style>
    <style:style style:name="T597" style:family="text">
      <style:text-properties style:font-name="Carlito" fo:font-size="12pt" fo:font-style="normal" fo:font-weight="normal" officeooo:rsid="094aa1c5" style:font-size-asian="12pt" style:font-style-asian="normal" style:font-weight-asian="normal" style:font-name-complex="Carlito" style:font-size-complex="12pt" style:font-style-complex="normal" style:font-weight-complex="normal"/>
    </style:style>
    <style:style style:name="T598" style:family="text">
      <style:text-properties fo:font-style="normal" fo:font-weight="normal" officeooo:rsid="0368411a" style:font-style-asian="normal" style:font-weight-asian="normal" style:font-style-complex="normal" style:font-weight-complex="normal"/>
    </style:style>
    <style:style style:name="T599" style:family="text">
      <style:text-properties fo:font-style="normal" fo:font-weight="normal" officeooo:rsid="050989aa" style:font-style-asian="normal" style:font-weight-asian="normal" style:font-style-complex="normal" style:font-weight-complex="normal"/>
    </style:style>
    <style:style style:name="T600" style:family="text">
      <style:text-properties fo:font-style="normal" fo:font-weight="normal" officeooo:rsid="050b7377" style:font-style-asian="normal" style:font-weight-asian="normal" style:font-style-complex="normal" style:font-weight-complex="normal"/>
    </style:style>
    <style:style style:name="T601" style:family="text">
      <style:text-properties officeooo:rsid="094965ba"/>
    </style:style>
    <style:style style:name="T602" style:family="text">
      <style:text-properties style:use-window-font-color="true" loext:opacity="0%" style:text-position="super 58%" style:font-name="Carlito" fo:font-size="12pt" style:font-size-asian="12pt" style:font-name-complex="Carlito" style:font-size-complex="12pt"/>
    </style:style>
    <style:style style:name="T603" style:family="text">
      <style:text-properties fo:font-weight="normal" officeooo:rsid="036d4fa6" style:font-weight-asian="normal" style:font-weight-complex="normal"/>
    </style:style>
    <style:style style:name="T604" style:family="text">
      <style:text-properties style:font-name="Carlito" fo:font-size="12pt" fo:font-weight="normal" officeooo:rsid="036d4fa6" style:font-size-asian="12pt" style:font-weight-asian="normal" style:font-name-complex="Carlito" style:font-size-complex="12pt" style:font-weight-complex="normal"/>
    </style:style>
    <style:style style:name="T605" style:family="text">
      <style:text-properties style:font-name="Carlito" fo:font-size="12pt" fo:font-weight="normal" officeooo:rsid="050cc977" style:font-size-asian="12pt" style:font-weight-asian="normal" style:font-name-complex="Carlito" style:font-size-complex="12pt" style:font-weight-complex="normal"/>
    </style:style>
    <style:style style:name="T606" style:family="text">
      <style:text-properties style:font-name="Carlito" fo:font-size="12pt" fo:font-weight="normal" officeooo:rsid="069e5bdd" style:font-size-asian="12pt" style:font-weight-asian="normal" style:font-name-complex="Carlito" style:font-size-complex="12pt" style:font-weight-complex="normal"/>
    </style:style>
    <style:style style:name="T607" style:family="text">
      <style:text-properties style:font-name="Carlito" fo:font-size="12pt" fo:font-weight="normal" officeooo:rsid="050e099e" style:font-size-asian="12pt" style:font-weight-asian="normal" style:font-name-complex="Carlito" style:font-size-complex="12pt" style:font-weight-complex="normal"/>
    </style:style>
    <style:style style:name="T608" style:family="text">
      <style:text-properties style:font-name="Carlito" fo:font-size="12pt" fo:font-weight="normal" officeooo:rsid="050dcd67" style:font-size-asian="12pt" style:font-weight-asian="normal" style:font-name-complex="Carlito" style:font-size-complex="12pt" style:font-weight-complex="normal"/>
    </style:style>
    <style:style style:name="T609" style:family="text">
      <style:text-properties style:font-name="Carlito" fo:font-size="12pt" fo:font-weight="normal" officeooo:rsid="061be89c" style:font-size-asian="12pt" style:font-weight-asian="normal" style:font-name-complex="Carlito" style:font-size-complex="12pt" style:font-weight-complex="normal"/>
    </style:style>
    <style:style style:name="T610" style:family="text">
      <style:text-properties style:font-name="Carlito" fo:font-size="12pt" fo:font-weight="normal" officeooo:rsid="061cb4be" style:font-size-asian="12pt" style:font-weight-asian="normal" style:font-name-complex="Carlito" style:font-size-complex="12pt" style:font-weight-complex="normal"/>
    </style:style>
    <style:style style:name="T611" style:family="text">
      <style:text-properties style:font-name="BlackChancery" fo:font-size="14pt" fo:font-weight="normal" officeooo:rsid="094cdec3" style:font-size-asian="12.25pt" style:font-weight-asian="normal" style:font-name-complex="Carlito" style:font-size-complex="14pt" style:font-weight-complex="normal"/>
    </style:style>
    <style:style style:name="T612" style:family="text">
      <style:text-properties style:font-name="BlackChancery" fo:font-size="14pt" fo:font-weight="normal" officeooo:rsid="08eb58e4" style:font-size-asian="12.25pt" style:font-weight-asian="normal" style:font-name-complex="Carlito" style:font-size-complex="14pt" style:font-weight-complex="normal"/>
    </style:style>
    <style:style style:name="T613" style:family="text">
      <style:text-properties style:font-name="BlackChancery" fo:font-size="14pt" fo:font-weight="normal" officeooo:rsid="08ebf35c" style:font-size-asian="12.25pt" style:font-weight-asian="normal" style:font-name-complex="Carlito" style:font-size-complex="14pt" style:font-weight-complex="normal"/>
    </style:style>
    <style:style style:name="T614" style:family="text">
      <style:text-properties style:font-name="BlackChancery" fo:font-size="14pt" fo:font-weight="normal" officeooo:rsid="094cacd8" style:font-size-asian="12.25pt" style:font-weight-asian="normal" style:font-name-complex="Carlito" style:font-size-complex="14pt" style:font-weight-complex="normal"/>
    </style:style>
    <style:style style:name="T615" style:family="text">
      <style:text-properties fo:color="#127622" loext:opacity="100%" style:font-name="Gabriela Nerd Font" fo:font-size="10pt" fo:font-weight="normal" officeooo:rsid="094cacd8" style:font-size-asian="10pt" style:font-weight-asian="normal" style:font-name-complex="Carlito" style:font-size-complex="10pt" style:font-weight-complex="normal"/>
    </style:style>
    <style:style style:name="T616" style:family="text">
      <style:text-properties style:text-position="super 58%" style:font-name="Carlito" fo:font-size="12pt" style:font-size-asian="12pt" style:font-name-complex="Carlito" style:font-size-complex="12pt"/>
    </style:style>
    <style:style style:name="T617" style:family="text">
      <style:text-properties officeooo:rsid="08f5ac3f"/>
    </style:style>
    <style:style style:name="T618" style:family="text">
      <style:text-properties officeooo:rsid="08f5e37b"/>
    </style:style>
    <style:style style:name="T619" style:family="text">
      <style:text-properties officeooo:rsid="08f7434e"/>
    </style:style>
    <style:style style:name="T620" style:family="text">
      <style:text-properties style:use-window-font-color="true" loext:opacity="0%" style:font-name="BlackChancery" fo:font-size="14pt" fo:font-style="normal" fo:font-weight="normal" officeooo:rsid="052a0d26" style:font-size-asian="12.25pt" style:font-style-asian="normal" style:font-weight-asian="normal" style:font-name-complex="Carlito" style:font-size-complex="14pt" style:font-style-complex="normal" style:font-weight-complex="normal"/>
    </style:style>
    <style:style style:name="T621" style:family="text">
      <style:text-properties style:use-window-font-color="true" loext:opacity="0%" style:font-name="BlackChancery" fo:font-size="14pt" fo:font-style="normal" fo:font-weight="normal" officeooo:rsid="05a6b9cb" style:font-size-asian="12.25pt" style:font-style-asian="normal" style:font-weight-asian="normal" style:font-name-complex="Carlito" style:font-size-complex="14pt" style:font-style-complex="normal" style:font-weight-complex="normal"/>
    </style:style>
    <style:style style:name="T622" style:family="text">
      <style:text-properties style:font-name="Carlito" fo:background-color="#dee6ef" loext:char-shading-value="0" style:font-name-complex="Carlito"/>
    </style:style>
    <style:style style:name="T623" style:family="text">
      <style:text-properties style:font-name="Carlito" fo:font-style="italic" fo:background-color="transparent" loext:char-shading-value="0" style:font-name-complex="Carlito"/>
    </style:style>
    <style:style style:name="T624" style:family="text">
      <style:text-properties style:font-name="Carlito" fo:background-color="#ffff00" loext:char-shading-value="0" style:font-name-complex="Carlito"/>
    </style:style>
    <style:style style:name="T625" style:family="text">
      <style:text-properties style:text-position="super 58%" style:font-name="Carlito" officeooo:rsid="055eba94" fo:background-color="transparent" loext:char-shading-value="0" style:font-name-complex="Carlito"/>
    </style:style>
    <style:style style:name="T626" style:family="text">
      <style:text-properties style:font-name="Carlito" fo:background-color="#ffd428" loext:char-shading-value="0" style:font-name-complex="Carlito"/>
    </style:style>
    <style:style style:name="T627" style:family="text">
      <style:text-properties style:font-name="Carlito" fo:background-color="#ffaa95" loext:char-shading-value="0" style:font-name-complex="Carlito"/>
    </style:style>
    <style:style style:name="T628" style:family="text">
      <style:text-properties style:font-name="Carlito" fo:font-style="italic" style:font-name-complex="Carlito"/>
    </style:style>
    <style:style style:name="T629" style:family="text">
      <style:text-properties officeooo:rsid="05591f2c"/>
    </style:style>
    <style:style style:name="T630" style:family="text">
      <style:text-properties officeooo:rsid="051aa56d"/>
    </style:style>
    <style:style style:name="T631" style:family="text">
      <style:text-properties fo:color="#127622" loext:opacity="100%" style:font-name="Gabriela Nerd Font" fo:font-size="12pt" fo:language="en" fo:country="US" officeooo:rsid="08a8ebc7" style:letter-kerning="false" style:font-name-asian="DejaVu Sans" style:font-size-asian="12pt" style:language-asian="zh" style:country-asian="CN" style:font-name-complex="Carlito" style:font-size-complex="12pt" style:language-complex="hi" style:country-complex="IN"/>
    </style:style>
    <style:style style:name="T632" style:family="text">
      <style:text-properties officeooo:rsid="08ce89e8"/>
    </style:style>
    <style:style style:name="T633" style:family="text">
      <style:text-properties officeooo:rsid="094e3476"/>
    </style:style>
    <style:style style:name="T634" style:family="text">
      <style:text-properties style:use-window-font-color="true" loext:opacity="0%" fo:font-style="normal" officeooo:rsid="0589faf4" style:font-style-asian="normal" style:font-style-complex="normal"/>
    </style:style>
    <style:style style:name="T635" style:family="text">
      <style:text-properties fo:font-style="normal" officeooo:rsid="0589faf4" style:font-style-asian="normal" style:font-style-complex="normal"/>
    </style:style>
    <style:style style:name="T636" style:family="text">
      <style:text-properties fo:font-style="normal" officeooo:rsid="058b1baf" style:font-style-asian="normal" style:font-style-complex="normal"/>
    </style:style>
    <style:style style:name="T637" style:family="text">
      <style:text-properties fo:font-style="normal" officeooo:rsid="059eb124" style:font-style-asian="normal" style:font-style-complex="normal"/>
    </style:style>
    <style:style style:name="T638" style:family="text">
      <style:text-properties fo:font-style="normal" officeooo:rsid="059eed53" style:font-style-asian="normal" style:font-style-complex="normal"/>
    </style:style>
    <style:style style:name="T639" style:family="text">
      <style:text-properties fo:font-style="normal" officeooo:rsid="05ca4cc2" style:font-style-asian="normal" style:font-style-complex="normal"/>
    </style:style>
    <style:style style:name="T640" style:family="text">
      <style:text-properties fo:color="#127622" loext:opacity="100%" style:font-name="Gabriela Nerd Font" fo:font-size="12pt" fo:language="en" fo:country="US" officeooo:rsid="08a90abc" style:letter-kerning="false" style:font-name-asian="DejaVu Sans" style:font-size-asian="12pt" style:language-asian="zh" style:country-asian="CN" style:font-name-complex="Carlito" style:font-size-complex="12pt" style:language-complex="hi" style:country-complex="IN"/>
    </style:style>
    <style:style style:name="T641" style:family="text">
      <style:text-properties fo:font-style="normal" officeooo:rsid="05a0b4e1" style:font-style-asian="normal" style:font-style-complex="normal"/>
    </style:style>
    <style:style style:name="T642" style:family="text">
      <style:text-properties fo:font-style="normal" officeooo:rsid="0595a5db" style:font-style-asian="normal" style:font-style-complex="normal"/>
    </style:style>
    <style:style style:name="T643" style:family="text">
      <style:text-properties fo:font-style="normal" officeooo:rsid="058fc64b" style:font-style-asian="normal" style:font-style-complex="normal"/>
    </style:style>
    <style:style style:name="T644" style:family="text">
      <style:text-properties fo:font-style="normal" officeooo:rsid="0594305a" style:font-style-asian="normal" style:font-style-complex="normal"/>
    </style:style>
    <style:style style:name="T645" style:family="text">
      <style:text-properties fo:font-style="normal" officeooo:rsid="05b3cce4" style:font-style-asian="normal" style:font-style-complex="normal"/>
    </style:style>
    <style:style style:name="T646" style:family="text">
      <style:text-properties fo:font-style="normal" officeooo:rsid="05b3cce4" fo:background-color="#ffff00" loext:char-shading-value="0" style:font-style-asian="normal" style:font-style-complex="normal"/>
    </style:style>
    <style:style style:name="T647" style:family="text">
      <style:text-properties fo:font-style="normal" officeooo:rsid="058a0c8d" style:font-style-asian="normal" style:font-style-complex="normal"/>
    </style:style>
    <style:style style:name="T648" style:family="text">
      <style:text-properties fo:font-style="normal" officeooo:rsid="058c464e" style:font-style-asian="normal" style:font-style-complex="normal"/>
    </style:style>
    <style:style style:name="T649" style:family="text">
      <style:text-properties fo:font-style="normal" officeooo:rsid="08a7d0e9" style:font-style-asian="normal" style:font-style-complex="normal"/>
    </style:style>
    <style:style style:name="T650" style:family="text">
      <style:text-properties fo:font-style="normal" officeooo:rsid="059601f0" style:font-style-asian="normal" style:font-style-complex="normal"/>
    </style:style>
    <style:style style:name="T651" style:family="text">
      <style:text-properties fo:font-style="normal" officeooo:rsid="05b4fc36" style:font-style-asian="normal" style:font-style-complex="normal"/>
    </style:style>
    <style:style style:name="T652" style:family="text">
      <style:text-properties fo:font-style="normal" officeooo:rsid="0601a97d" style:font-style-asian="normal" style:font-style-complex="normal"/>
    </style:style>
    <style:style style:name="T653" style:family="text">
      <style:text-properties fo:font-style="normal" officeooo:rsid="05b81be0" style:font-style-asian="normal" style:font-style-complex="normal"/>
    </style:style>
    <style:style style:name="T654" style:family="text">
      <style:text-properties fo:font-style="normal" officeooo:rsid="05b8a0c7" style:font-style-asian="normal" style:font-style-complex="normal"/>
    </style:style>
    <style:style style:name="T655" style:family="text">
      <style:text-properties fo:font-style="normal" officeooo:rsid="05b59e24" style:font-style-asian="normal" style:font-style-complex="normal"/>
    </style:style>
    <style:style style:name="T656" style:family="text">
      <style:text-properties fo:font-style="normal" officeooo:rsid="05b6d110" style:font-style-asian="normal" style:font-style-complex="normal"/>
    </style:style>
    <style:style style:name="T657" style:family="text">
      <style:text-properties fo:font-style="normal" officeooo:rsid="05971b04" style:font-style-asian="normal" style:font-style-complex="normal"/>
    </style:style>
    <style:style style:name="T658" style:family="text">
      <style:text-properties fo:font-style="normal" officeooo:rsid="06024d3c" style:font-style-asian="normal" style:font-style-complex="normal"/>
    </style:style>
    <style:style style:name="T659" style:family="text">
      <style:text-properties fo:font-style="normal" officeooo:rsid="05bcec36" style:font-style-asian="normal" style:font-style-complex="normal"/>
    </style:style>
    <style:style style:name="T660" style:family="text">
      <style:text-properties fo:font-style="normal" officeooo:rsid="0597e4a4" style:font-style-asian="normal" style:font-style-complex="normal"/>
    </style:style>
    <style:style style:name="T661" style:family="text">
      <style:text-properties fo:font-style="normal" officeooo:rsid="05bd32cf" style:font-style-asian="normal" style:font-style-complex="normal"/>
    </style:style>
    <style:style style:name="T662" style:family="text">
      <style:text-properties fo:font-style="normal" officeooo:rsid="059a035a" style:font-style-asian="normal" style:font-style-complex="normal"/>
    </style:style>
    <style:style style:name="T663" style:family="text">
      <style:text-properties fo:font-style="italic" officeooo:rsid="05bd32cf" style:font-style-asian="italic" style:font-style-complex="italic"/>
    </style:style>
    <style:style style:name="T664" style:family="text">
      <style:text-properties fo:font-style="normal" officeooo:rsid="05983ad6" style:font-style-asian="normal" style:font-style-complex="normal"/>
    </style:style>
    <style:style style:name="T665" style:family="text">
      <style:text-properties fo:color="#ff0000" loext:opacity="100%" fo:font-style="normal" officeooo:rsid="05983ad6" style:font-style-asian="normal" style:font-style-complex="normal"/>
    </style:style>
    <style:style style:name="T666" style:family="text">
      <style:text-properties fo:font-style="normal" officeooo:rsid="05cb1f92" style:font-style-asian="normal" style:font-style-complex="normal"/>
    </style:style>
    <style:style style:name="T667" style:family="text">
      <style:text-properties fo:font-style="normal" officeooo:rsid="059cd3ce" style:font-style-asian="normal" style:font-style-complex="normal"/>
    </style:style>
    <style:style style:name="T668" style:family="text">
      <style:text-properties fo:font-style="normal" officeooo:rsid="08dc8af8" style:font-style-asian="normal" style:font-style-complex="normal"/>
    </style:style>
    <style:style style:name="T669" style:family="text">
      <style:text-properties fo:font-style="normal" officeooo:rsid="0952ecca" style:font-style-asian="normal" style:font-style-complex="normal"/>
    </style:style>
    <style:style style:name="T670" style:family="text">
      <style:text-properties fo:font-style="normal" officeooo:rsid="094f3e77" style:font-style-asian="normal" style:font-style-complex="normal"/>
    </style:style>
    <style:style style:name="T671" style:family="text">
      <style:text-properties fo:font-style="normal" officeooo:rsid="09512289" style:font-style-asian="normal" style:font-style-complex="normal"/>
    </style:style>
    <style:style style:name="T672" style:family="text">
      <style:text-properties fo:font-style="normal" officeooo:rsid="09521bfb" style:font-style-asian="normal" style:font-style-complex="normal"/>
    </style:style>
    <style:style style:name="T673" style:family="text">
      <style:text-properties fo:font-style="normal" officeooo:rsid="05bf44a6" style:font-style-asian="normal" style:font-style-complex="normal"/>
    </style:style>
    <style:style style:name="T674" style:family="text">
      <style:text-properties fo:font-style="normal" officeooo:rsid="08ad9778" style:font-style-asian="normal" style:font-style-complex="normal"/>
    </style:style>
    <style:style style:name="T675" style:family="text">
      <style:text-properties fo:font-style="normal" officeooo:rsid="05c02574" style:font-style-asian="normal" style:font-style-complex="normal"/>
    </style:style>
    <style:style style:name="T676" style:family="text">
      <style:text-properties fo:font-style="normal" officeooo:rsid="08d5451a" style:font-style-asian="normal" style:font-style-complex="normal"/>
    </style:style>
    <style:style style:name="T677" style:family="text">
      <style:text-properties fo:font-style="normal" officeooo:rsid="055a1ee6" style:font-style-asian="normal" style:font-style-complex="normal"/>
    </style:style>
    <style:style style:name="T678" style:family="text">
      <style:text-properties fo:font-style="italic" officeooo:rsid="055a1ee6" style:font-style-asian="italic" style:font-style-complex="italic"/>
    </style:style>
    <style:style style:name="T679" style:family="text">
      <style:text-properties fo:font-style="normal" officeooo:rsid="08b7aace" style:font-style-asian="normal" style:font-style-complex="normal"/>
    </style:style>
    <style:style style:name="T680" style:family="text">
      <style:text-properties fo:font-style="normal" officeooo:rsid="055bf2f0" style:font-style-asian="normal" style:font-style-complex="normal"/>
    </style:style>
    <style:style style:name="T681" style:family="text">
      <style:text-properties fo:font-style="normal" officeooo:rsid="05cba9c5" style:font-style-asian="normal" style:font-style-complex="normal"/>
    </style:style>
    <style:style style:name="T682" style:family="text">
      <style:text-properties fo:font-style="normal" officeooo:rsid="055dbaf6" style:font-style-asian="normal" style:font-style-complex="normal"/>
    </style:style>
    <style:style style:name="T683" style:family="text">
      <style:text-properties fo:font-style="normal" officeooo:rsid="08de3867" style:font-style-asian="normal" style:font-style-complex="normal"/>
    </style:style>
    <style:style style:name="T684" style:family="text">
      <style:text-properties fo:font-style="normal" officeooo:rsid="08dc12fe" style:font-style-asian="normal" style:font-style-complex="normal"/>
    </style:style>
    <style:style style:name="T685" style:family="text">
      <style:text-properties fo:font-style="normal" officeooo:rsid="08b3ea43" style:font-style-asian="normal" style:font-style-complex="normal"/>
    </style:style>
    <style:style style:name="T686" style:family="text">
      <style:text-properties fo:language="en" fo:country="US" officeooo:rsid="08b22202" style:language-asian="zh" style:country-asian="CN" style:language-complex="hi" style:country-complex="IN"/>
    </style:style>
    <style:style style:name="T687" style:family="text">
      <style:text-properties fo:language="en" fo:country="US" fo:font-style="italic" officeooo:rsid="08b22202" style:language-asian="zh" style:country-asian="CN" style:font-style-asian="italic" style:language-complex="hi" style:country-complex="IN" style:font-style-complex="italic"/>
    </style:style>
    <style:style style:name="T688" style:family="text">
      <style:text-properties fo:language="en" fo:country="US" officeooo:rsid="08d33a99" style:language-asian="zh" style:country-asian="CN" style:language-complex="hi" style:country-complex="IN"/>
    </style:style>
    <style:style style:name="T689" style:family="text">
      <style:text-properties fo:language="en" fo:country="US" officeooo:rsid="08b7aace" style:language-asian="zh" style:country-asian="CN" style:language-complex="hi" style:country-complex="IN"/>
    </style:style>
    <style:style style:name="T690" style:family="text">
      <style:text-properties fo:language="en" fo:country="US" fo:font-style="italic" officeooo:rsid="08b7aace" style:language-asian="zh" style:country-asian="CN" style:font-style-asian="italic" style:language-complex="hi" style:country-complex="IN" style:font-style-complex="italic"/>
    </style:style>
    <style:style style:name="T691" style:family="text">
      <style:text-properties fo:language="en" fo:country="US" fo:font-style="normal" officeooo:rsid="08b7aace" style:language-asian="zh" style:country-asian="CN" style:font-style-asian="normal" style:language-complex="hi" style:country-complex="IN" style:font-style-complex="normal"/>
    </style:style>
    <style:style style:name="T692" style:family="text">
      <style:text-properties fo:language="en" fo:country="US" officeooo:rsid="08b933cd" style:language-asian="zh" style:country-asian="CN" style:language-complex="hi" style:country-complex="IN"/>
    </style:style>
    <style:style style:name="T693" style:family="text">
      <style:text-properties fo:language="en" fo:country="US" fo:font-style="italic" officeooo:rsid="08b933cd" style:language-asian="zh" style:country-asian="CN" style:font-style-asian="italic" style:language-complex="hi" style:country-complex="IN" style:font-style-complex="italic"/>
    </style:style>
    <style:style style:name="T694" style:family="text">
      <style:text-properties officeooo:rsid="08de7792"/>
    </style:style>
    <style:style style:name="T695" style:family="text">
      <style:text-properties officeooo:rsid="08de3867"/>
    </style:style>
    <style:style style:name="T696" style:family="text">
      <style:text-properties style:use-window-font-color="true" loext:opacity="0%" style:font-name="Liberation Sans1" fo:font-style="normal" style:text-underline-style="none" fo:font-weight="normal" officeooo:rsid="08d0d916" style:font-style-asian="normal" style:font-weight-asian="normal" style:font-name-complex="Carlito" style:font-style-complex="normal" style:font-weight-complex="normal"/>
    </style:style>
    <style:style style:name="T697" style:family="text">
      <style:text-properties style:use-window-font-color="true" loext:opacity="0%" style:font-name="Liberation Sans1" fo:font-style="normal" style:text-underline-style="none" fo:font-weight="normal" officeooo:rsid="03d2fcdd" style:font-style-asian="normal" style:font-weight-asian="normal" style:font-name-complex="Carlito" style:font-style-complex="normal" style:font-weight-complex="normal"/>
    </style:style>
    <style:style style:name="T698" style:family="text">
      <style:text-properties style:use-window-font-color="true" loext:opacity="0%" style:font-name="Liberation Sans1" fo:font-size="12pt" fo:font-style="normal" style:text-underline-style="none" fo:font-weight="normal" officeooo:rsid="03d2fcdd" style:font-size-asian="12pt" style:font-style-asian="normal" style:font-weight-asian="normal" style:font-name-complex="Carlito" style:font-size-complex="12pt" style:font-style-complex="normal" style:font-weight-complex="normal"/>
    </style:style>
    <style:style style:name="T699" style:family="text">
      <style:text-properties style:use-window-font-color="true" loext:opacity="0%" style:font-name="Liberation Sans1" fo:font-size="12pt" fo:font-style="normal" style:text-underline-style="none" fo:font-weight="normal" officeooo:rsid="08d1813e" style:font-size-asian="12pt" style:font-style-asian="normal" style:font-weight-asian="normal" style:font-name-complex="Carlito" style:font-size-complex="12pt" style:font-style-complex="normal" style:font-weight-complex="normal"/>
    </style:style>
    <style:style style:name="T700" style:family="text">
      <style:text-properties style:use-window-font-color="true" loext:opacity="0%" style:font-name="Liberation Sans1" fo:font-size="12pt" fo:font-style="normal" style:text-underline-style="none" fo:font-weight="normal" officeooo:rsid="08d191e5" style:font-size-asian="12pt" style:font-style-asian="normal" style:font-weight-asian="normal" style:font-name-complex="Carlito" style:font-size-complex="12pt" style:font-style-complex="normal" style:font-weight-complex="normal"/>
    </style:style>
    <style:style style:name="T701" style:family="text">
      <style:text-properties fo:color="#127622" loext:opacity="100%" style:font-name="Gabriela Nerd Font" fo:font-size="10pt" fo:language="en" fo:country="US" officeooo:rsid="04553ef7" style:letter-kerning="false" style:font-name-asian="DejaVu Sans" style:font-size-asian="10pt" style:language-asian="zh" style:country-asian="CN" style:font-name-complex="Carlito" style:font-size-complex="10pt" style:language-complex="hi" style:country-complex="IN"/>
    </style:style>
    <style:style style:name="T702" style:family="text">
      <style:text-properties style:use-window-font-color="true" loext:opacity="0%" style:font-name="Liberation Sans1" fo:font-size="10pt" fo:font-style="normal" style:text-underline-style="none" fo:font-weight="normal" officeooo:rsid="08d191e5" style:font-size-asian="10pt" style:font-style-asian="normal" style:font-weight-asian="normal" style:font-name-complex="Carlito" style:font-size-complex="10pt" style:font-style-complex="normal" style:font-weight-complex="normal"/>
    </style:style>
    <style:style style:name="T703" style:family="text">
      <style:text-properties officeooo:rsid="08d183b8"/>
    </style:style>
    <style:style style:name="T704" style:family="text">
      <style:text-properties officeooo:rsid="03d40634"/>
    </style:style>
    <style:style style:name="T705" style:family="text">
      <style:text-properties officeooo:rsid="03d32579"/>
    </style:style>
    <style:style style:name="T706" style:family="text">
      <style:text-properties style:use-window-font-color="true" loext:opacity="0%" style:font-name="Liberation Sans1" fo:font-size="12pt" fo:font-style="normal" style:text-underline-style="none" fo:font-weight="normal" officeooo:rsid="063c0066" style:font-size-asian="12pt" style:font-style-asian="normal" style:font-weight-asian="normal" style:font-name-complex="Carlito" style:font-size-complex="12pt" style:font-style-complex="normal" style:font-weight-complex="normal"/>
    </style:style>
    <style:style style:name="T707" style:family="text">
      <style:text-properties style:use-window-font-color="true" loext:opacity="0%" style:font-name="Liberation Sans1" fo:font-size="12pt" fo:font-style="normal" style:text-underline-style="none" fo:font-weight="normal" officeooo:rsid="03d32579" style:font-size-asian="12pt" style:font-style-asian="normal" style:font-weight-asian="normal" style:font-name-complex="Carlito" style:font-size-complex="12pt" style:font-style-complex="normal" style:font-weight-complex="normal"/>
    </style:style>
    <style:style style:name="T708" style:family="text">
      <style:text-properties style:use-window-font-color="true" loext:opacity="0%" style:font-name="Liberation Sans1" fo:font-size="12pt" fo:font-style="normal" style:text-underline-style="none" fo:font-weight="normal" officeooo:rsid="08da4793" style:font-size-asian="12pt" style:font-style-asian="normal" style:font-weight-asian="normal" style:font-name-complex="Carlito" style:font-size-complex="12pt" style:font-style-complex="normal" style:font-weight-complex="normal"/>
    </style:style>
    <style:style style:name="T709" style:family="text">
      <style:text-properties style:use-window-font-color="true" loext:opacity="0%" style:font-name="Liberation Sans1" fo:font-size="12pt" fo:font-style="normal" style:text-underline-style="none" fo:font-weight="normal" officeooo:rsid="09593412" style:font-size-asian="12pt" style:font-style-asian="normal" style:font-weight-asian="normal" style:font-name-complex="Carlito" style:font-size-complex="12pt" style:font-style-complex="normal" style:font-weight-complex="normal"/>
    </style:style>
    <style:style style:name="T710" style:family="text">
      <style:text-properties fo:color="#127622" loext:opacity="100%" style:font-name="Gabriela Nerd Font" fo:font-size="10pt" fo:language="en" fo:country="US" officeooo:rsid="0959d506" style:letter-kerning="false" style:font-name-asian="DejaVu Sans" style:font-size-asian="10pt" style:language-asian="zh" style:country-asian="CN" style:font-name-complex="Carlito" style:font-size-complex="10pt" style:language-complex="hi" style:country-complex="IN"/>
    </style:style>
    <style:style style:name="T711" style:family="text">
      <style:text-properties officeooo:rsid="095c58d7"/>
    </style:style>
    <style:style style:name="T712" style:family="text">
      <style:text-properties officeooo:rsid="063c0066"/>
    </style:style>
    <style:style style:name="T713" style:family="text">
      <style:text-properties officeooo:rsid="03ded843"/>
    </style:style>
    <style:style style:name="T714" style:family="text">
      <style:text-properties style:use-window-font-color="true" loext:opacity="0%" style:font-name="Liberation Sans1" fo:font-size="12pt" fo:font-style="normal" style:text-underline-style="none" fo:font-weight="normal" officeooo:rsid="08e57074" style:font-size-asian="12pt" style:font-style-asian="normal" style:font-weight-asian="normal" style:font-name-complex="Carlito" style:font-size-complex="12pt" style:font-style-complex="normal" style:font-weight-complex="normal"/>
    </style:style>
    <style:style style:name="T715" style:family="text">
      <style:text-properties style:use-window-font-color="true" loext:opacity="0%" style:font-name="Liberation Sans1" fo:font-size="12pt" fo:font-style="normal" style:text-underline-style="none" fo:font-weight="normal" officeooo:rsid="08e751d8" style:font-size-asian="12pt" style:font-style-asian="normal" style:font-weight-asian="normal" style:font-name-complex="Carlito" style:font-size-complex="12pt" style:font-style-complex="normal" style:font-weight-complex="normal"/>
    </style:style>
    <style:style style:name="T716" style:family="text">
      <style:text-properties fo:color="#127622" loext:opacity="100%" style:font-name="Gabriela Nerd Font" fo:font-size="10pt" fo:language="en" fo:country="US" officeooo:rsid="095b7fe7" style:letter-kerning="false" style:font-name-asian="DejaVu Sans" style:font-size-asian="10pt" style:language-asian="zh" style:country-asian="CN" style:font-name-complex="Carlito" style:font-size-complex="10pt" style:language-complex="hi" style:country-complex="IN"/>
    </style:style>
    <style:style style:name="T717" style:family="text">
      <style:text-properties officeooo:rsid="08e6e011"/>
    </style:style>
    <style:style style:name="T718" style:family="text">
      <style:text-properties officeooo:rsid="0574d468"/>
    </style:style>
    <style:style style:name="T719" style:family="text">
      <style:text-properties officeooo:rsid="063c56ff"/>
    </style:style>
    <style:style style:name="T720" style:family="text">
      <style:text-properties officeooo:rsid="03d93d61"/>
    </style:style>
    <style:style style:name="T721" style:family="text">
      <style:text-properties officeooo:rsid="03df9a43"/>
    </style:style>
    <style:style style:name="T722" style:family="text">
      <style:text-properties officeooo:rsid="063d8551"/>
    </style:style>
    <style:style style:name="T723" style:family="text">
      <style:text-properties officeooo:rsid="063f2465"/>
    </style:style>
    <style:style style:name="T724" style:family="text">
      <style:text-properties officeooo:rsid="08dbbf1e"/>
    </style:style>
    <style:style style:name="T725" style:family="text">
      <style:text-properties officeooo:rsid="03e1c4fe"/>
    </style:style>
    <style:style style:name="T726" style:family="text">
      <style:text-properties officeooo:rsid="03e16cb9"/>
    </style:style>
    <style:style style:name="T727" style:family="text">
      <style:text-properties officeooo:rsid="03dc8b1b"/>
    </style:style>
    <style:style style:name="T728" style:family="text">
      <style:text-properties officeooo:rsid="063fbfdc"/>
    </style:style>
    <style:style style:name="T729" style:family="text">
      <style:text-properties officeooo:rsid="09067e37"/>
    </style:style>
    <style:style style:name="T730" style:family="text">
      <style:text-properties officeooo:rsid="09080147"/>
    </style:style>
    <style:style style:name="T731" style:family="text">
      <style:text-properties officeooo:rsid="095ec7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aints that resurrected after Jesus</text:p>
      <text:p text:style-name="Standard"/>
      <text:p text:style-name="P2">In only one of the synoptic gospels do we read about a very curious <text:span text:style-name="T1">recount</text:span> of many saints who resurrected after<text:span text:style-name="T2"> Jesus </text:span><text:span text:style-name="T3">and</text:span><text:span text:style-name="T4"> </text:span><text:span text:style-name="T5">left their graves and went into Jerusalem and many people saw them. </text:span><text:span text:style-name="T6">A scant 27 words comprise </text:span><text:span text:style-name="T7">the description of </text:span><text:span text:style-name="T6">this miraculous event </text:span><text:span text:style-name="T8">and we’re </text:span><text:span text:style-name="T9">seemingly</text:span><text:span text:style-name="T8"> left wondering a</text:span><text:span text:style-name="T10"> plethora of </text:span><text:span text:style-name="T8">questions such as:</text:span></text:p>
      <text:list text:style-name="L1">
        <text:list-item>
          <text:p text:style-name="P3">What did they do in the city? How long were they there?</text:p>
        </text:list-item>
        <text:list-item>
          <text:p text:style-name="P4">Where were they before they resurrected?</text:p>
        </text:list-item>
        <text:list-item>
          <text:p text:style-name="P5">Why did they resurrect after Jesus and not <text:span text:style-name="T11">instead </text:span>after his crucifixion <text:span text:style-name="T12">and</text:span> before his resurrection?</text:p>
        </text:list-item>
      </text:list>
      <text:p text:style-name="P6"/>
      <text:p text:style-name="P7"><text:span text:style-name="T13">Some of the questions that we might have </text:span><text:span text:style-name="T14">are</text:span><text:span text:style-name="T13"> answered </text:span><text:span text:style-name="T14">in</text:span><text:span text:style-name="T13"> the Bible and many of them remain secret (</text:span><text:span text:style-name="T15">Deu 29:29</text:span><text:span text:style-name="T13">). </text:span>You a<text:span text:style-name="T16">re invited to join me for this </text:span><text:span text:style-name="T17">challenging </text:span><text:span text:style-name="T18">and</text:span><text:span text:style-name="T17"> </text:span><text:span text:style-name="T16">enlightening Bible study which has been ongoing for</text:span><text:span text:style-name="T19"> </text:span><text:span text:style-name="T20">at least two </text:span><text:span text:style-name="T21">years</text:span><text:span text:style-name="T16"> to </text:span><text:span text:style-name="T22">discover</text:span><text:span text:style-name="T16"> what we can </text:span><text:span text:style-name="T22">learn </text:span><text:span text:style-name="T16">from the Bible about this mira</text:span><text:span text:style-name="T23">culous event</text:span><text:span text:style-name="T16">. </text:span><text:span text:style-name="T24">For brevity, </text:span><text:span text:style-name="T25">most</text:span><text:span text:style-name="T24"> verse contexts have been omitted</text:span><text:span text:style-name="T26"> </text:span><text:span text:style-name="T25">and you will be required </text:span><text:span text:style-name="T27">to get</text:span><text:span text:style-name="T25"> into your Bible </text:span><text:span text:style-name="T27">and pray </text:span><text:span text:style-name="T25">nearly every step of </text:span><text:span text:style-name="T28">the way</text:span><text:span text:style-name="T25"> </text:span><text:span text:style-name="T29">(</text:span><text:span text:style-name="T15">Act 17:11</text:span><text:span text:style-name="T29">, </text:span><text:span text:style-name="T15">2Ti 2:15</text:span><text:span text:style-name="T29">)</text:span><text:span text:style-name="T25">.</text:span></text:p>
      <text:p text:style-name="P8"/>
      <text:p text:style-name="P8"/>
      <text:p text:style-name="P9"><text:span text:style-name="T30">T</text:span>he <text:span text:style-name="T31">bridegroom</text:span></text:p>
      <text:p text:style-name="Standard"/>
      <table:table table:name="Table4" table:style-name="Table4">
        <table:table-column table:style-name="Table4.A"/>
        <table:table-row>
          <table:table-cell table:style-name="Table4.A1" office:value-type="string">
            <text:p text:style-name="P10">Matthew 27:50-53</text:p>
            <text:p text:style-name="P11"><text:span text:style-name="T32">50 </text:span>Jesus, when he had cried again with a loud voice, yielded up the ghost.</text:p>
            <text:p text:style-name="P11"><text:span text:style-name="T32">51</text:span> And, behold, the veil of the temple was rent in twain from the top to the bottom; and the earth did quake, and the rocks rent;</text:p>
            <text:p text:style-name="P11"><text:span text:style-name="T32">52 </text:span>And the graves were opened; and many bodies of the saints which slept arose,</text:p>
            <text:p text:style-name="P11"><text:span text:style-name="T32">53 </text:span>And came out of the graves <text:span text:style-name="T33">after his resurrection</text:span>, and went into <text:span text:style-name="T34">the holy city</text:span>, and appeared unto many.</text:p>
          </table:table-cell>
        </table:table-row>
      </table:table>
      <text:list text:style-name="L2">
        <text:list-item>
          <text:p text:style-name="P12"><text:span text:style-name="T35">After Jesus’ resurrection </text:span><text:span text:style-name="T36">many</text:span><text:span text:style-name="T35"> saints were </text:span><text:span text:style-name="T36">resurrected</text:span><text:span text:style-name="T35"> </text:span><text:span text:style-name="T37">and went into </text:span><text:span text:style-name="T38">Jerusalem</text:span>.</text:p>
          <text:list>
            <text:list-item>
              <text:p text:style-name="P12"><text:span text:style-name="T15">Nehemiah 11:1,18</text:span><text:span text:style-name="T39">, </text:span><text:span text:style-name="T15">Isaiah 52:1</text:span>, <text:span text:style-name="T15">Daniel 9:24</text:span>, <text:span text:style-name="T15">Matthew 4:5</text:span></text:p>
            </text:list-item>
          </text:list>
        </text:list-item>
      </text:list>
      <text:p text:style-name="P13"/>
      <text:p text:style-name="P13"/>
      <text:p text:style-name="P14">The bride</text:p>
      <text:p text:style-name="Standard"/>
      <table:table table:name="Table27" table:style-name="Table27">
        <table:table-column table:style-name="Table27.A"/>
        <table:table-row>
          <table:table-cell table:style-name="Table27.A1" office:value-type="string">
            <text:p text:style-name="P15">Psalms 30:4</text:p>
            <text:p text:style-name="P16">Sing unto the LORD, O <text:span text:style-name="T33">ye saints of his</text:span>, and give thanks at the remembrance of his holiness.</text:p>
          </table:table-cell>
        </table:table-row>
        <table:table-row>
          <table:table-cell table:style-name="Table27.A2" office:value-type="string">
            <text:p text:style-name="P17">Psalms 97:10</text:p>
            <text:p text:style-name="Standard">Ye that love the LORD, hate evil: he preserveth the souls of <text:span text:style-name="T33">his saints</text:span>; he delivereth them out of the hand of the wicked.</text:p>
          </table:table-cell>
        </table:table-row>
        <table:table-row>
          <table:table-cell table:style-name="Table27.A2" office:value-type="string">
            <text:p text:style-name="P18">1 Samuel 2:9</text:p>
            <text:p text:style-name="P19"><text:span text:style-name="T40">He will keep the feet of </text:span><text:span text:style-name="T33">his saints</text:span><text:span text:style-name="T40">, a</text:span>nd the wicked shall be silent in darkness; for by strength shall no man prevail.</text:p>
          </table:table-cell>
        </table:table-row>
        <table:table-row>
          <table:table-cell table:style-name="Table27.A2" office:value-type="string">
            <text:p text:style-name="P20"><text:span text:style-name="T15">Acts 9:13</text:span><text:span text:style-name="T41"> </text:span><text:span text:style-name="T42">(Ananias responding to the Lord about Saul/Paul)</text:span></text:p>
            <text:p text:style-name="P21">Then Ananias answ<text:span text:style-name="T40">ered, Lord, I have heard by many of this man, how much evil he hath done to </text:span><text:span text:style-name="T33">thy saints</text:span><text:span text:style-name="T40"> at Jerusalem:</text:span></text:p>
          </table:table-cell>
        </table:table-row>
        <table:table-row>
          <table:table-cell table:style-name="Table27.A2" office:value-type="string">
            <text:p text:style-name="P18">Philippians 4:21</text:p>
            <text:p text:style-name="P21">Salute eve<text:span text:style-name="T40">ry </text:span><text:span text:style-name="T33">saint in Christ Jesus</text:span><text:span text:style-name="T40">. The b</text:span>rethren which are with me greet you.</text:p>
          </table:table-cell>
        </table:table-row>
        <table:table-row>
          <table:table-cell table:style-name="Table27.A2" office:value-type="string">
            <text:p text:style-name="P22"><text:span text:style-name="T15">Jude 1:14</text:span><text:span text:style-name="T43"><text:line-break/>And Enoch also, the seventh fr</text:span><text:span text:style-name="T44">om Adam, prophesied of these, saying, Behold, the Lord cometh with ten thousands of </text:span><text:span text:style-name="T45">his saints</text:span><text:span text:style-name="T44">,</text:span></text:p>
          </table:table-cell>
        </table:table-row>
      </table:table>
      <text:list text:style-name="L3">
        <text:list-item>
          <text:p text:style-name="P23">Saints are washed by the blood; saved from the wrath to come;<text:span text:style-name="T46"> the reborn; </text:span><text:span text:style-name="T47">the </text:span><text:span text:style-name="T48">children, </text:span><text:span text:style-name="T47">sons, </text:span><text:span text:style-name="T49">breth</text:span><text:span text:style-name="T48">re</text:span><text:span text:style-name="T49">n, friends </text:span><text:span text:style-name="T50">and servants </text:span><text:span text:style-name="T47">of G</text:span><text:span text:style-name="T51">od; </text:span><text:span text:style-name="T52">heirs of the righteousness which is by faith; </text:span><text:span text:style-name="T49">heirs </text:span><text:span text:style-name="T53">of salvation and of </text:span><text:span text:style-name="T49">the </text:span><text:span text:style-name="T53">promise; </text:span><text:span text:style-name="T54">heirs of God and join</text:span><text:span text:style-name="T55">t</text:span><text:span text:style-name="T54">-heirs with Christ.</text:span></text:p>
        </text:list-item>
      </text:list>
      <text:p text:style-name="P24"><text:soft-page-break/>Sleep</text:p>
      <text:p text:style-name="Standard"/>
      <table:table table:name="Table23" table:style-name="Table23">
        <table:table-column table:style-name="Table23.A"/>
        <table:table-column table:style-name="Table23.B"/>
        <table:table-row>
          <table:table-cell table:style-name="Table23.A1" office:value-type="string">
            <text:p text:style-name="Table_20_Contents"><text:span text:style-name="T15">John 11:11-14</text:span><text:span text:style-name="T43"><text:line-break/></text:span><text:span text:style-name="T56">11</text:span><text:span text:style-name="T43"> These things said he: and after that he saith unto them, </text:span><text:span text:style-name="T57">Our friend Lazarus </text:span><text:span text:style-name="T58">sleepeth</text:span><text:span text:style-name="T57">; but I go, that I may awake him out of </text:span><text:span text:style-name="T58">sleep</text:span><text:span text:style-name="T57">.</text:span><text:span text:style-name="T43"> <text:line-break/></text:span><text:span text:style-name="T56">12</text:span><text:span text:style-name="T43"> Then said his disciples, Lord, if he sleep, he shall do well. <text:line-break/></text:span><text:span text:style-name="T56">13</text:span><text:span text:style-name="T43"> Howbeit </text:span><text:span text:style-name="T44">Jesus spake of his death</text:span><text:span text:style-name="T43">: but they thought that he had spoken of taking of rest in sleep. <text:line-break/></text:span><text:span text:style-name="T56">14</text:span><text:span text:style-name="T43"> Then said Jesus unto them plainly, </text:span><text:span text:style-name="T59">Lazarus is dead</text:span><text:span text:style-name="T57">.</text:span></text:p>
          </table:table-cell>
          <table:table-cell table:style-name="Table23.B1" table:number-rows-spanned="2" office:value-type="string">
            <text:p text:style-name="P25"><text:span text:style-name="T60">Sleep as in the body is dead </text:span><text:span text:style-name="T61">(</text:span><text:span text:style-name="T15">Ecc 12:7</text:span><text:span text:style-name="T61">)</text:span></text:p>
          </table:table-cell>
        </table:table-row>
        <table:table-row>
          <table:table-cell table:style-name="Table23.A2" office:value-type="string">
            <text:p text:style-name="Table_20_Contents"><text:span text:style-name="T15">Deuteronomy 31:16</text:span><text:span text:style-name="T43"><text:line-break/>And the LORD said unto Moses, </text:span><text:span text:style-name="T57">Behold, </text:span><text:span text:style-name="T59">thou shalt </text:span><text:span text:style-name="T58">sleep</text:span><text:span text:style-name="T59"> with thy fathers</text:span><text:span text:style-name="T57">; and this people will rise up, and go a whoring after the gods of the strangers of the land, whither they go </text:span><text:span text:style-name="T62">to be</text:span><text:span text:style-name="T57"> among them, and will forsake me, and break my covenant which I have made with them.</text:span></text:p>
          </table:table-cell>
          <table:covered-table-cell table:style-name="Table23.B2"/>
        </table:table-row>
        <table:table-row>
          <table:table-cell table:style-name="Table23.A3" office:value-type="string">
            <text:p text:style-name="P26"><text:span text:style-name="T15">Genesis 2:21</text:span><text:span text:style-name="T43"><text:line-break/>And the LORD God caused </text:span><text:span text:style-name="T44">a deep </text:span><text:span text:style-name="T45">sleep</text:span><text:span text:style-name="T44"> to fall upon Adam, and he </text:span><text:span text:style-name="T45">slept</text:span><text:span text:style-name="T43">: and he took one of his ribs, and closed up the flesh instead thereof;</text:span></text:p>
          </table:table-cell>
          <table:table-cell table:style-name="Table23.B2" table:number-rows-spanned="3" office:value-type="string">
            <text:p text:style-name="P27"><text:span text:style-name="T63">S</text:span>leep <text:span text:style-name="T64">as in</text:span><text:span text:style-name="T65"> to rest</text:span></text:p>
          </table:table-cell>
        </table:table-row>
        <table:table-row>
          <table:table-cell table:style-name="Table23.A3" office:value-type="string">
            <text:p text:style-name="P18">Genesis 28:16</text:p>
            <text:p text:style-name="P28">And Jacob awaked out of his <text:span text:style-name="T33">sleep</text:span>, and he said, Surely the LORD is in this place; and I knew <text:span text:style-name="T66">i</text:span>t not.</text:p>
          </table:table-cell>
          <table:covered-table-cell table:style-name="Table23.B2"/>
        </table:table-row>
        <table:table-row table:style-name="Table23.5">
          <table:table-cell table:style-name="Table23.A5" office:value-type="string">
            <text:p text:style-name="P29"><text:span text:style-name="T15">Matthew 1:20-24</text:span><text:span text:style-name="T43"><text:line-break/></text:span><text:span text:style-name="T67">20</text:span><text:span text:style-name="T44"> But while he thought on these things, behold, the angel of the Lord appeared unto him in a dream, saying, </text:span><text:span text:style-name="T59">Joseph, thou son of David, fear not to take unto thee Mary thy wife: for that which is conceived in her is of the Holy Ghost.</text:span><text:span text:style-name="T44"> <text:line-break/></text:span><text:span text:style-name="T67">21</text:span><text:span text:style-name="T44"> </text:span><text:span text:style-name="T59">And she shall bring forth a son, and thou shalt call his name JESUS: for he shall save his people from their sins.</text:span><text:span text:style-name="T44"> <text:line-break/></text:span><text:span text:style-name="T67">22</text:span><text:span text:style-name="T68"> </text:span><text:span text:style-name="T44">Now all this was done, that it might be fulfilled which was spoken of the Lord by the prophet, saying, </text:span></text:p>
            <text:p text:style-name="P30"><text:span text:style-name="T69">23</text:span><text:span text:style-name="T70"> B</text:span>ehold, a virgin shall be with child, and shall bring forth a son, and they shall call his name Emmanuel, which being interpreted is, God with us. <text:line-break/><text:span text:style-name="T69">24</text:span><text:span text:style-name="T70"> </text:span>Then Joseph being raised from <text:span text:style-name="T33">sleep</text:span> did as the angel of the Lord had bidden him, and took unto him his wife:</text:p>
          </table:table-cell>
          <table:covered-table-cell table:style-name="Table23.B2"/>
        </table:table-row>
        <table:table-row table:style-name="Table23.5">
          <table:table-cell table:style-name="Table23.A6" office:value-type="string">
            <text:p text:style-name="P18">Romans 13:11</text:p>
            <text:p text:style-name="P31">And that, knowing the time, that now it is high time to awake out of <text:span text:style-name="T33">sleep</text:span>: for now is our salvation nearer than when we believed.</text:p>
            <text:p text:style-name="P32"/>
            <text:p text:style-name="P18">1 Thessalonians 5:6</text:p>
            <text:p text:style-name="P31">Therefore let us not <text:span text:style-name="T33">sleep</text:span>, as do others; but let us watch and be sober.</text:p>
          </table:table-cell>
          <table:table-cell table:style-name="Table23.B2" office:value-type="string">
            <text:p text:style-name="P33">Sleep as in living carelessly <text:span text:style-name="T71">with regards to spiritual matters</text:span></text:p>
          </table:table-cell>
        </table:table-row>
      </table:table>
      <text:p text:style-name="Text_20_body"/>
      <text:p text:style-name="P34">Hell</text:p>
      <text:p text:style-name="Standard"/>
      <table:table table:name="Table1" table:style-name="Table1">
        <table:table-column table:style-name="Table1.A"/>
        <table:table-row table:style-name="Table1.1">
          <table:table-cell table:style-name="Table1.A1" office:value-type="string">
            <text:p text:style-name="P18">Revelation 20:13,14</text:p>
            <text:p text:style-name="P35"><text:span text:style-name="T72">13</text:span><text:span text:style-name="T73"> </text:span><text:span text:style-name="T74">A</text:span><text:span text:style-name="T75">nd the sea gave up the dead which were in it; and death and </text:span><text:span text:style-name="T76">hell</text:span><text:span text:style-name="T77">G86</text:span><text:span text:style-name="T76"> delivered up the dead which were in them</text:span><text:span text:style-name="T75">: and they were judged every man according to their works.</text:span></text:p>
            <text:p text:style-name="P35"><text:span text:style-name="T72">14</text:span><text:span text:style-name="T73"> </text:span><text:span text:style-name="T78">And </text:span><text:span text:style-name="T79">death and hell</text:span><text:span text:style-name="T80">G86</text:span><text:span text:style-name="T79"> were cast into the lake of fire</text:span><text:span text:style-name="T78">. This is the second death.</text:span></text:p>
          </table:table-cell>
        </table:table-row>
      </table:table>
      <text:list text:style-name="L4">
        <text:list-item>
          <text:p text:style-name="P36"><text:span text:style-name="T81">And so we learn that h</text:span><text:span text:style-name="T78">ell</text:span><text:span text:style-name="T82"> </text:span><text:span text:style-name="T78">is not the final destination for any </text:span><text:span text:style-name="T83">of the dead.</text:span></text:p>
        </text:list-item>
      </text:list>
      <table:table table:name="Table10" table:style-name="Table10">
        <table:table-column table:style-name="Table10.A"/>
        <table:table-column table:style-name="Table10.B"/>
        <table:table-row>
          <table:table-cell table:style-name="Table10.A1" office:value-type="string">
            <text:p text:style-name="P37"><text:span text:style-name="T15">Genesis 37:35</text:span><text:span text:style-name="T84"> </text:span><text:span text:style-name="T85">(Jacob speaking)</text:span><text:span text:style-name="T86"><text:line-break/></text:span><text:span text:style-name="T84">And all his sons and all his daughters rose up to comfort him; but he refused to be comforted; and he said, For I will go down into the </text:span><text:span text:style-name="T87">grave</text:span><text:span text:style-name="T88">H7585</text:span><text:span text:style-name="T84"> unto my son mourning. Thus his father wept for him.</text:span><text:span text:style-name="T86"><text:line-break/><text:line-break/></text:span><text:span text:style-name="T15">Numbers 16:30</text:span><text:span text:style-name="T84"> </text:span><text:span text:style-name="T85">(</text:span><text:span text:style-name="T89">Moses speaking about </text:span><text:span text:style-name="T85">the sons of Korah)</text:span><text:span text:style-name="T86"><text:line-break/></text:span><text:span text:style-name="T84">But if the LORD make a new thing, and the earth open her mouth, and swallow them up, with all that </text:span><text:span text:style-name="T90">appertain</text:span><text:span text:style-name="T84"> unto them, and they go down quick into the </text:span><text:span text:style-name="T87">pit</text:span><text:span text:style-name="T88">H7585</text:span><text:span text:style-name="T84">; then ye shall understand that these men have provoked the LORD.</text:span><text:span text:style-name="T86"><text:line-break/></text:span></text:p>
            <text:p text:style-name="P37"><text:span text:style-name="T15">Deuteronomy 32:22</text:span><text:span text:style-name="T41"> </text:span><text:span text:style-name="T85">(the song of Moses)</text:span><text:span text:style-name="T91"><text:line-break/>For a fire is kindled in mine anger, and shall burn unto the lowest </text:span><text:span text:style-name="T92">hell</text:span><text:span text:style-name="T93">H7585</text:span><text:span text:style-name="T91">, and shall consume the earth with her increase, and set on fire the foundations of the mountains.</text:span></text:p>
          </table:table-cell>
          <table:table-cell table:style-name="Table10.B1" office:value-type="string">
            <text:p text:style-name="P38">H7585</text:p>
            <text:p text:style-name="P39">שְׁאֹול (shᵉʼôwl | sheh-ole')</text:p>
            <text:p text:style-name="P40"/>
            <text:p text:style-name="P41"><text:span text:style-name="T94">Derivation</text:span>: from <text:span text:style-name="T95">H759</text:span><text:span text:style-name="T96">2</text:span></text:p>
            <text:p text:style-name="P41"><text:span text:style-name="T94">Strong's</text:span>: <text:span text:style-name="T33">Hades or the world of the dead</text:span> (as if a subterranean retreat), including its accessories and inmates.</text:p>
            <text:p text:style-name="P42">KJV usage:<text:span text:style-name="T97"> grave, hell, pit</text:span></text:p>
          </table:table-cell>
        </table:table-row>
        <table:table-row>
          <table:table-cell table:style-name="Table10.A2" office:value-type="string">
            <text:p text:style-name="P18">Daniel 12:2</text:p>
            <text:p text:style-name="P43">And many of them that sleep in the dust of the earth shall awake, some to everlasting life, and some to shame and <text:span text:style-name="T33">everlasting contempt</text:span><text:span text:style-name="T98">H1860</text:span>.</text:p>
            <text:p text:style-name="P43"/>
            <text:p text:style-name="P18">Isaiah 66:24</text:p>
            <text:p text:style-name="P44">And they shall go forth, and look upon the carcases of the men that have transgressed against me: for their worm shall not die, neither shall their fire be quenched; <text:span text:style-name="T33">and they shall be an abhorring</text:span><text:span text:style-name="T99">H1860</text:span> unto all flesh.</text:p>
          </table:table-cell>
          <table:table-cell table:style-name="Table10.B2" office:value-type="string">
            <text:p text:style-name="P45">There doesn’t appear to be a <text:span text:style-name="T100">single</text:span> Hebrew word in the old testament referring to the <text:span text:style-name="T101">final destination of those separated from God (</text:span><text:span text:style-name="T102">which would be the </text:span><text:span text:style-name="T101">OT equivalent </text:span><text:span text:style-name="T103">to</text:span><text:span text:style-name="T101"> G1067).</text:span></text:p>
          </table:table-cell>
        </table:table-row>
        <table:table-row table:style-name="Table10.3">
          <table:table-cell table:style-name="Table10.A2" office:value-type="string">
            <text:p text:style-name="P18">Matthew 11:23</text:p>
            <text:p text:style-name="P41">And thou, Capernaum, which art exalted unto heaven, shalt be brought down to <text:span text:style-name="T33">hell</text:span><text:span text:style-name="T104">G86</text:span>: for if the mighty works, which have been done in thee, had been done in Sodom, it would have remained until this day.</text:p>
            <text:p text:style-name="P41"/>
            <text:p text:style-name="P37"><text:span text:style-name="T15">1 Corinthians 15:55</text:span><text:span text:style-name="T84"> </text:span><text:span text:style-name="T105">(</text:span><text:span text:style-name="T106">cross ref. </text:span><text:span text:style-name="T15">Isaiah 25:8</text:span><text:span text:style-name="T105">)</text:span></text:p>
            <text:p text:style-name="P41">O death, where is thy sting? O <text:span text:style-name="T33">grave</text:span><text:span text:style-name="T104">G86</text:span>, where is thy victory?</text:p>
          </table:table-cell>
          <table:table-cell table:style-name="Table10.B2" office:value-type="string">
            <text:p text:style-name="P38">G86</text:p>
            <text:p text:style-name="P39">ᾅδης (háidēs | hah'-dace)</text:p>
            <text:p text:style-name="P39"/>
            <text:p text:style-name="P41"><text:span text:style-name="T94">Derivation</text:span>: from G1 (as negative particle) and G1492</text:p>
            <text:p text:style-name="P41"><text:span text:style-name="T107">Strong's</text:span><text:span text:style-name="T108">: </text:span><text:span text:style-name="T109">p</text:span>roperly, unseen, i.e. <text:span text:style-name="T33">"Hades" or the place (state) of departed souls</text:span></text:p>
            <text:p text:style-name="P46">KJV usage:<text:span text:style-name="T97"> </text:span><text:span text:style-name="T110">grave, hell</text:span></text:p>
          </table:table-cell>
        </table:table-row>
        <table:table-row table:style-name="Table10.4">
          <table:table-cell table:style-name="Table10.A2" office:value-type="string">
            <text:p text:style-name="P18">Matthew 5:22</text:p>
            <text:p text:style-name="P41">But I say unto you, That whosoever is angry with his brother without a cause shall be in danger of the judgment: and whosoever shall say to his brother, Raca, shall be in danger of the council: but whosoever shall say, Thou fool, shall be in danger of <text:span text:style-name="T33">hell</text:span><text:span text:style-name="T111">G1067</text:span> <text:span text:style-name="T112">fire</text:span>.</text:p>
            <text:p text:style-name="P37"><text:span text:style-name="T91"><text:line-break/></text:span><text:span text:style-name="T15">Matthew 10:28</text:span><text:span text:style-name="T91"><text:line-break/>And fear not them which kill the body, but are not able to kill the soul: but rather fear him which is able to </text:span><text:span text:style-name="T113">destroy both soul and body</text:span><text:span text:style-name="T91"> in </text:span><text:span text:style-name="T92">hell</text:span><text:span text:style-name="T114">G1067</text:span><text:span text:style-name="T115">.</text:span></text:p>
            <text:p text:style-name="P37"><text:span text:style-name="T91"><text:line-break/></text:span><text:span text:style-name="T15">Mark 9:45</text:span><text:span text:style-name="T91"><text:line-break/>And if thy foot offend thee, cut it off: it is better for thee to enter halt into life, than having two feet to be </text:span><text:span text:style-name="T92">cast into hell</text:span><text:span text:style-name="T114">G1067</text:span><text:span text:style-name="T115">,</text:span><text:span text:style-name="T91"> into </text:span><text:span text:style-name="T115">the </text:span><text:span text:style-name="T113">fire that never shall be quenched</text:span><text:span text:style-name="T115">:</text:span></text:p>
            <text:p text:style-name="P37"><text:span text:style-name="T115"><text:line-break/></text:span><text:span text:style-name="T15">Revelation 20:14</text:span><text:span text:style-name="T115"><text:line-break/></text:span><text:span text:style-name="T116">14</text:span><text:span text:style-name="T117"> A</text:span><text:span text:style-name="T115">nd death and </text:span><text:span text:style-name="T92">hell</text:span><text:span text:style-name="T118">G86</text:span><text:span text:style-name="T115"> were </text:span><text:span text:style-name="T92">cast into the lake of fire</text:span><text:span text:style-name="T115">. This is the second death.</text:span></text:p>
          </table:table-cell>
          <table:table-cell table:style-name="Table10.B2" office:value-type="string">
            <text:p text:style-name="P47">G1067</text:p>
            <text:p text:style-name="P48">γέεννα (géenna | gheh'-en-nah)</text:p>
            <text:p text:style-name="P48"/>
            <text:p text:style-name="P41"><text:span text:style-name="T94">Derivation</text:span>: of Hebrew origin (H1516 and H2011);</text:p>
            <text:p text:style-name="P41"><text:span text:style-name="T94">Strong's</text:span>: valley of (the son of) Hinnom; ge-henna (or Ge-Hinnom), a valley of Jerusalem, used (figuratively) as a name for the <text:span text:style-name="T119">place (or state) of everlasting punishment</text:span></text:p>
            <text:p text:style-name="P46">KJV usage:<text:span text:style-name="T97"> </text:span><text:span text:style-name="T120">hell</text:span></text:p>
          </table:table-cell>
        </table:table-row>
      </table:table>
      <text:list text:style-name="L5">
        <text:list-item>
          <text:p text:style-name="P49">And so we learn that Hades and Gehenna are not the same place and that we need to be very careful when we see the word hell.</text:p>
        </text:list-item>
      </text:list>
      <text:p text:style-name="P50"><text:soft-page-break/>Other names/phrases for hell</text:p>
      <text:p text:style-name="P51"/>
      <table:table table:name="Table16" table:style-name="Table16">
        <table:table-column table:style-name="Table16.A"/>
        <table:table-row>
          <table:table-cell table:style-name="Table16.A1" office:value-type="string">
            <text:p text:style-name="P52"><text:span text:style-name="T15">Ezekiel 31:12-18</text:span><text:span text:style-name="T121"><text:line-break/></text:span><text:span text:style-name="T122">10</text:span><text:span text:style-name="T123"> Therefore thus saith the Lord GOD; Because thou hast lifted up thyself in height, and he hath shot up his top among the thick boughs, and his heart is lifted up in his height; <text:line-break/></text:span><text:span text:style-name="T122">11</text:span><text:span text:style-name="T123"> I have therefore delivered him into the hand of the mighty one of the heathen; he shall surely deal with him: I have driven him out for his wickedness.</text:span><text:line-break/><text:span text:style-name="T32">12</text:span> And strangers, the terrible of the nations, <text:span text:style-name="T33">have cut him off</text:span>, and have left him: upon the mountains and in all the valleys his branches <text:span text:style-name="T33">are fallen</text:span>, and his boughs are <text:span text:style-name="T33">broken</text:span> by all the rivers of the land; and all the people of the earth are gone down from his shadow, and have left him.</text:p>
            <text:p text:style-name="P53"><text:span text:style-name="T32">13</text:span> Upon his ruin shall all the fowls of the heaven remain, and all the beasts of the field shall be upon his branches:</text:p>
            <text:p text:style-name="P53"><text:span text:style-name="T32">14</text:span> <text:span text:style-name="T124">To the end that none of all the trees by the waters exalt themselves for their height, neither shoot up their top among the thick boughs, neither their trees stand up in their height, all that drink water</text:span><text:span text:style-name="T125">Pro </text:span><text:span text:style-name="T126">16:18</text:span>: for <text:span text:style-name="T33">they are all delivered unto death</text:span>, <text:span text:style-name="T33">to the</text:span> <text:span text:style-name="T127">nether part</text:span><text:span text:style-name="T128">s</text:span><text:span text:style-name="T127"> of the earth</text:span>, <text:span text:style-name="T33">in the midst of the children of men</text:span>, <text:span text:style-name="T33">with them that go down to</text:span> <text:span text:style-name="T127">the pit</text:span>.</text:p>
            <text:p text:style-name="P54"><text:span text:style-name="T122">15</text:span> Thus saith the Lord GOD; In the day when he <text:span text:style-name="T33">went down to</text:span> <text:span text:style-name="T127">the grave</text:span> I caused a mourning: I covered <text:span text:style-name="T127">the deep</text:span> for him, and I restrained the floods thereof, and the great waters were stayed: and I caused Lebanon to mourn for him, and all the trees of the field fainted for him.</text:p>
            <text:p text:style-name="P54"><text:span text:style-name="T122">16</text:span> I made the nations to shake at the sound of <text:span text:style-name="T33">his fall</text:span>, when I <text:span text:style-name="T33">cast him down</text:span> <text:span text:style-name="T127">to hell</text:span> with them that <text:span text:style-name="T33">descend into</text:span> <text:span text:style-name="T127">the pit</text:span>: and all the trees of Eden, the choice and best of Lebanon, all that drink water, shall be comforted in the <text:span text:style-name="T127">nether part</text:span><text:span text:style-name="T128">s </text:span><text:span text:style-name="T127">of the earth.</text:span></text:p>
            <text:p text:style-name="P54"><text:span text:style-name="T122">17</text:span> They also went down into <text:span text:style-name="T127">hell</text:span> with him unto <text:span text:style-name="T129">them that be</text:span> slain with the sword; and <text:span text:style-name="T129">they that were</text:span> his arm, <text:span text:style-name="T129">that</text:span> dwelt under his shadow in the midst of the heathen.<text:line-break/><text:span text:style-name="T122">18</text:span> To whom art thou thus like in glory and in greatness among the trees of Eden? yet shalt thou be brought down with the trees of Eden unto the <text:span text:style-name="T127">nether part</text:span><text:span text:style-name="T128">s</text:span><text:span text:style-name="T127"> of the earth</text:span>: <text:span text:style-name="T33">thou shalt lie in the midst of the uncircumcised</text:span> with <text:span text:style-name="T129">them that be</text:span> slain by the sword. This <text:span text:style-name="T129">is</text:span> Pharaoh and all his multitude, saith the Lord GOD.</text:p>
          </table:table-cell>
        </table:table-row>
      </table:table>
      <text:list text:style-name="L6">
        <text:list-item>
          <text:p text:style-name="P55"><text:span text:style-name="T130">Much like Jotham’s parable in </text:span><text:span text:style-name="T15">Judges 9:7-15</text:span><text:span text:style-name="T131"> people are represented as trees.</text:span></text:p>
        </text:list-item>
        <text:list-item>
          <text:p text:style-name="P55"><text:span text:style-name="T132">In </text:span><text:span text:style-name="T15">Ezekiel 31</text:span><text:span text:style-name="T132">, the prophet Ezekiel is sent to </text:span><text:span text:style-name="T133">warn</text:span><text:span text:style-name="T132"> the Pharaoh of Egypt </text:span><text:span text:style-name="T134">that hi</text:span><text:span text:style-name="T135">m and all his multitude’s</text:span><text:span text:style-name="T134"> fate </text:span><text:span text:style-name="T136">would be</text:span><text:span text:style-name="T134"> the same as the Assyrians. </text:span><text:span text:style-name="T137">Both the Pharaoh and the Assyrian had </text:span><text:span text:style-name="T133">exalted themselves</text:span><text:span text:style-name="T137"> up after </text:span><text:span text:style-name="T138">being given</text:span><text:span text:style-name="T137"> great wealth and power </text:span><text:span text:style-name="T139">by God.</text:span></text:p>
        </text:list-item>
        <text:list-item>
          <text:p text:style-name="P56"><text:span text:style-name="T136">In v</text:span><text:span text:style-name="T15">14</text:span><text:span text:style-name="T136"> </text:span><text:span text:style-name="T140">God tells us the purpose for verses </text:span><text:span text:style-name="T15">10-13</text:span><text:span text:style-name="T140">: and that is to serve as a warning to all other prosperous people </text:span><text:span text:style-name="T141">to not exalt themselves.</text:span></text:p>
          <text:list>
            <text:list-item>
              <text:p text:style-name="P57"><text:span text:style-name="T142">Deuteronomy 8:18</text:span><text:span text:style-name="T39">, </text:span><text:span text:style-name="T15">Romans 11:18-21</text:span><text:span text:style-name="T143">, </text:span><text:span text:style-name="T15">1 Timothy 6:17</text:span></text:p>
            </text:list-item>
          </text:list>
        </text:list-item>
      </text:list>
      <text:p text:style-name="P51"/>
      <text:p text:style-name="P58">NOTE: “the deep” is <text:span text:style-name="T144">also </text:span>a phrase that <text:span text:style-name="T144">is used</text:span> to <text:span text:style-name="T144">refer to </text:span>the depths of a body of water (literally <text:span text:style-name="T145">and/or</text:span> figuratively).</text:p>
      <table:table table:name="Table14" table:style-name="Table14">
        <table:table-column table:style-name="Table14.A"/>
        <table:table-row>
          <table:table-cell table:style-name="Table14.A1" office:value-type="string">
            <text:p text:style-name="P59">Numbers 16:30</text:p>
            <text:p text:style-name="P60">But if the LORD make a new thing, and the earth open her mouth, and swallow them up, with all that appertain unto them, and they go down quick <text:span text:style-name="T112">into the pit</text:span><text:span text:style-name="T146">H7585</text:span>; then ye shall understand that these men have provoked the LORD.</text:p>
          </table:table-cell>
        </table:table-row>
        <table:table-row>
          <table:table-cell table:style-name="Table14.A2" office:value-type="string">
            <text:p text:style-name="P61"><text:span text:style-name="T15">Luke 8:31</text:span><text:span text:style-name="T91"><text:line-break/>And they besought him that he would not command them to </text:span><text:span text:style-name="T115">go out</text:span><text:span text:style-name="T91"> into </text:span><text:span text:style-name="T113">the deep</text:span><text:span text:style-name="T147">G12</text:span><text:span text:style-name="T91">.</text:span></text:p>
          </table:table-cell>
        </table:table-row>
        <table:table-row>
          <table:table-cell table:style-name="Table14.A2" office:value-type="string">
            <text:p text:style-name="P61"><text:span text:style-name="T15">Romans 10:7</text:span><text:span text:style-name="T91"><text:line-break/>Or, Who shall descend into </text:span><text:span text:style-name="T113">the deep</text:span><text:span text:style-name="T147">G12</text:span><text:span text:style-name="T91">? (that is, to bring up Christ again from </text:span><text:span text:style-name="T113">the dead</text:span><text:span text:style-name="T91">.)</text:span></text:p>
          </table:table-cell>
        </table:table-row>
        <table:table-row>
          <table:table-cell table:style-name="Table14.A2" office:value-type="string">
            <text:p text:style-name="P59">Revelation 9:1</text:p>
            <text:p text:style-name="P60">And the fifth angel sounded, and I saw a star fall from heaven unto the earth: and to him was given the key <text:span text:style-name="T112">of the bottomless</text:span><text:span text:style-name="T148">G12</text:span> pit.</text:p>
          </table:table-cell>
        </table:table-row>
        <table:table-row>
          <table:table-cell table:style-name="Table14.A2" office:value-type="string">
            <text:p text:style-name="P61"><text:span text:style-name="T15">Revelation 20:1</text:span><text:span text:style-name="T91"><text:line-break/>And I saw an angel come down from heaven, having the key of </text:span><text:span text:style-name="T113">the bottomless pit</text:span><text:span text:style-name="T149">G12</text:span><text:span text:style-name="T91"> and a great chain in his hand.</text:span></text:p>
          </table:table-cell>
        </table:table-row>
        <table:table-row>
          <table:table-cell table:style-name="Table14.A2" office:value-type="string">
            <text:p text:style-name="P61"><text:span text:style-name="T15">Ezekiel 32:18,24</text:span><text:span text:style-name="T150"> “</text:span><text:span text:style-name="T151">nether parts of the earth” </text:span><text:span text:style-name="T152">&amp; “the pit”</text:span></text:p>
          </table:table-cell>
        </table:table-row>
      </table:table>
      <text:p text:style-name="P62"><text:soft-page-break/>The divisions of hell, the temporary abode of the dead</text:p>
      <text:p text:style-name="Standard"/>
      <table:table table:name="Table2" table:style-name="Table2">
        <table:table-column table:style-name="Table2.A"/>
        <table:table-row>
          <table:table-cell table:style-name="Table2.A1" office:value-type="string">
            <text:p text:style-name="P63"><text:span text:style-name="T15">Luke 16:23-26</text:span><text:span text:style-name="T153"><text:line-break/></text:span><text:span text:style-name="T154">23</text:span><text:span text:style-name="T153"> And in </text:span><text:span text:style-name="T155">hell</text:span><text:span text:style-name="T156">G86</text:span><text:span text:style-name="T153"> he lift up his eyes, being in torments, and </text:span><text:span text:style-name="T155">seeth Abraham</text:span><text:span text:style-name="T153"> afar off, </text:span><text:span text:style-name="T155">and Lazarus</text:span><text:span text:style-name="T153"> in his bosom.</text:span></text:p>
            <text:p text:style-name="P64"><text:span text:style-name="T157">24</text:span><text:span text:style-name="T158"> And he cried and said, Father Abraham, have mercy on me, and send Lazarus, that he may dip the tip of his finger in water, and cool my tongue; for I am tormented in this flame.</text:span></text:p>
            <text:p text:style-name="P64"><text:span text:style-name="T157">25</text:span><text:span text:style-name="T158"> But Abraham said, Son, remember that thou in thy lifetime receivedst thy good things, and likewise Lazarus evil things: but now </text:span><text:span text:style-name="T159">he is comforted</text:span><text:span text:style-name="T158">, and </text:span><text:span text:style-name="T159">thou art tormented</text:span><text:span text:style-name="T158">.</text:span></text:p>
            <text:p text:style-name="P64"><text:span text:style-name="T157">26</text:span><text:span text:style-name="T158"> And beside all this, between us and you </text:span><text:span text:style-name="T159">there is a great gulf fixed</text:span><text:span text:style-name="T158">: so that they which would pass from hence to you cannot; neither can they pass to us, that </text:span><text:span text:style-name="T160">would come</text:span><text:span text:style-name="T158"> from thence.</text:span></text:p>
          </table:table-cell>
        </table:table-row>
      </table:table>
      <text:list text:style-name="L7">
        <text:list-item>
          <text:p text:style-name="P65"><text:span text:style-name="T161">Note that this is not a parable. </text:span><text:span text:style-name="T162">God is </text:span><text:span text:style-name="T163">explicit</text:span><text:span text:style-name="T162"> </text:span><text:span text:style-name="T164">every time that</text:span><text:span text:style-name="T162"> He </text:span><text:span text:style-name="T165">spoke</text:span><text:span text:style-name="T162"> in parables for example </text:span><text:span text:style-name="T15">Luke 5:36</text:span><text:span text:style-name="T39">, </text:span><text:span text:style-name="T15">6:39</text:span><text:span text:style-name="T39">, </text:span><text:span text:style-name="T15">8:4,9,11</text:span><text:span text:style-name="T39">, </text:span><text:span text:style-name="T15">12:16,41</text:span><text:span text:style-name="T39">, </text:span><text:span text:style-name="T15">13:6</text:span><text:span text:style-name="T39">, </text:span><text:span text:style-name="T15">14:7</text:span><text:span text:style-name="T39">, </text:span><text:span text:style-name="T15">15:3</text:span><text:span text:style-name="T39">, </text:span><text:span text:style-name="T15">18:1,9</text:span><text:span text:style-name="T39">, </text:span><text:span text:style-name="T15">19:11</text:span><text:span text:style-name="T39">, </text:span><text:span text:style-name="T15">20:9,19</text:span><text:span text:style-name="T166">, </text:span><text:span text:style-name="T167">and </text:span><text:span text:style-name="T15">21:29</text:span><text:span text:style-name="T166">.</text:span></text:p>
          <text:list>
            <text:list-item>
              <text:p text:style-name="P65"><text:span text:style-name="T168">The last parable before the recounting of the rich man and Lazarus is at </text:span><text:span text:style-name="T15">Luke 15:3-10</text:span><text:span text:style-name="T168">. From thereafter He does not speak another parable until </text:span><text:span text:style-name="T15">Luke 18</text:span><text:span text:style-name="T168">.</text:span></text:p>
            </text:list-item>
          </text:list>
        </text:list-item>
        <text:list-item>
          <text:p text:style-name="P66">Abraham, Lazarus, and the rich man all went to the same general place <text:span text:style-name="T169">after they physically died </text:span><text:span text:style-name="T170">(hell).</text:span></text:p>
        </text:list-item>
        <text:list-item>
          <text:p text:style-name="P67">The rich man, Lazarus, and Abraham were all <text:span text:style-name="T171">close enough to see and </text:span><text:span text:style-name="T172">to </text:span><text:span text:style-name="T171">speak to each other.</text:span></text:p>
        </text:list-item>
        <text:list-item>
          <text:p text:style-name="P68"><text:span text:style-name="T173">From these verses we learn that h</text:span><text:span text:style-name="T171">ell </text:span><text:span text:style-name="T174">has at least two separate places within it</text:span><text:span text:style-name="T171">: the place of torment </text:span><text:span text:style-name="T175">(where the rich man </text:span><text:span text:style-name="T176">is</text:span><text:span text:style-name="T175">) </text:span><text:span text:style-name="T171">and the place of comfort </text:span><text:span text:style-name="T175">(where Abraham and Lazarus were)</text:span><text:span text:style-name="T171">.</text:span></text:p>
        </text:list-item>
      </text:list>
      <text:p text:style-name="Standard"/>
      <text:p text:style-name="Standard"/>
      <text:p text:style-name="P69"><text:span text:style-name="T177">D</text:span><text:span text:style-name="T178">efining terminology</text:span></text:p>
      <text:p text:style-name="P70"/>
      <table:table table:name="Table39" table:style-name="Table39">
        <table:table-column table:style-name="Table39.A"/>
        <table:table-row>
          <table:table-cell table:style-name="Table39.A1" office:value-type="string">
            <text:p text:style-name="P71">Deuteronomy 24:6</text:p>
            <text:p text:style-name="P72">No man shall take the <text:span text:style-name="T33">nether</text:span><text:span text:style-name="T179">H7347</text:span> or the <text:span text:style-name="T180">upper</text:span> millstone to pledge: for he taketh a man's life to pledge.</text:p>
          </table:table-cell>
        </table:table-row>
        <table:table-row>
          <table:table-cell table:style-name="Table39.A2" office:value-type="string">
            <text:p text:style-name="P71">Joshua 15:19</text:p>
            <text:p text:style-name="P72">Who answered, Give me a blessing; for thou hast given me a south land; give me also springs of water. And he gave her the <text:span text:style-name="T180">upper</text:span> springs, and the <text:span text:style-name="T33">nether</text:span><text:span text:style-name="T181">H8482</text:span> springs.</text:p>
          </table:table-cell>
        </table:table-row>
        <table:table-row table:style-name="Table39.3">
          <table:table-cell table:style-name="Table39.A2" office:value-type="string">
            <text:p text:style-name="P71">Lamentations 3:55</text:p>
            <text:p text:style-name="P73">I called upon thy name, O LORD, out of the <text:span text:style-name="T33">low</text:span><text:span text:style-name="T182">H8482</text:span> dungeon.</text:p>
          </table:table-cell>
        </table:table-row>
        <table:table-row table:style-name="Table39.3">
          <table:table-cell table:style-name="Table39.A2" office:value-type="string">
            <text:p text:style-name="P71">Genesis 6:16</text:p>
            <text:p text:style-name="P73">A window shalt thou make to the ark, and in a cubit shalt thou finish it above; and the door of the ark shalt thou set in the side thereof; with <text:span text:style-name="T33">lower</text:span><text:span text:style-name="T182">H8482</text:span>, second, and third stories shalt thou make it.</text:p>
          </table:table-cell>
        </table:table-row>
        <table:table-row table:style-name="Table39.3">
          <table:table-cell table:style-name="Table39.A2" office:value-type="string">
            <text:p text:style-name="P71">Deuteronomy 32:22</text:p>
            <text:p text:style-name="P73">For a fire is kindled in mine anger, and shall burn unto the <text:span text:style-name="T33">lowest</text:span><text:span text:style-name="T183">H8482</text:span> hell, and shall consume the earth with her increase, and set on fire the foundations of the mountains.</text:p>
          </table:table-cell>
        </table:table-row>
      </table:table>
      <text:list text:style-name="L8">
        <text:list-item>
          <text:p text:style-name="P74">“<text:span text:style-name="T184">nether” has three Strong’s numbers associated with it: H8481, H8482, &amp; H7347.</text:span></text:p>
        </text:list-item>
        <text:list-item>
          <text:p text:style-name="P74">A general definition of the word “nether” <text:span text:style-name="T185">as it is used </text:span>in the Bible is “low/<text:span text:style-name="T186">lower/lowest</text:span>”.</text:p>
        </text:list-item>
        <text:list-item>
          <text:p text:style-name="P75"><text:span text:style-name="T187">This definition may seem trivial at first but as we </text:span><text:span text:style-name="T188">can </text:span><text:span text:style-name="T189">see in </text:span><text:span text:style-name="T190">at least</text:span><text:span text:style-name="T189"> </text:span><text:span text:style-name="T15">Eph</text:span><text:span text:style-name="T191">esians</text:span><text:span text:style-name="T15"> 4:9</text:span><text:span text:style-name="T187"> it is a bridge between the old and the new testament concerning prophecy.</text:span></text:p>
        </text:list-item>
      </text:list>
      <text:p text:style-name="P76"/>
      <text:p text:style-name="P76"/>
      <text:p text:style-name="P76"/>
      <text:p text:style-name="P76"/>
      <text:p text:style-name="P76"/>
      <text:p text:style-name="P76"/>
      <text:p text:style-name="P76"/>
      <text:p text:style-name="P76"/>
      <text:p text:style-name="P76"/>
      <text:p text:style-name="P77"><text:soft-page-break/>That thou mayest say to the prisoners, Go forth</text:p>
      <text:p text:style-name="Standard"/>
      <table:table table:name="Table3" table:style-name="Table3">
        <table:table-column table:style-name="Table3.A"/>
        <table:table-row>
          <table:table-cell table:style-name="Table3.A1" office:value-type="string">
            <text:p text:style-name="P78"><text:span text:style-name="T192">Psalms 68:18</text:span><text:span text:style-name="T193"><text:line-break/></text:span><text:span text:style-name="T194">Thou hast ascended on high, </text:span><text:span text:style-name="T195">thou hast led captivity captive</text:span><text:span text:style-name="T194">: thou hast received gifts for men; yea, for the rebellious also, </text:span><text:span text:style-name="T196">that the LORD God might dwell among them.</text:span><text:span text:style-name="T193"><text:line-break/></text:span></text:p>
            <text:p text:style-name="P79">Ephesians 4:8-10</text:p>
            <text:p text:style-name="P80"><text:span text:style-name="T197">8</text:span><text:span text:style-name="T198"> </text:span>Wherefore he saith, When he ascended up on high, <text:span text:style-name="T33">he led captivity captive</text:span>, and gave gifts unto men.</text:p>
            <text:p text:style-name="P80"><text:span text:style-name="T197">9</text:span><text:span text:style-name="T70"> </text:span>(Now that he ascended, what is it but that <text:span text:style-name="T112">he also descended first into the lower parts of the earth?</text:span></text:p>
            <text:p text:style-name="P80"><text:span text:style-name="T197">10</text:span><text:span text:style-name="T199"> He that descended is the same also that ascended up </text:span><text:span text:style-name="T200">far above all heavens</text:span><text:span text:style-name="T199">, that he might </text:span><text:span text:style-name="T200">fill all things</text:span><text:span text:style-name="T199">.)</text:span></text:p>
          </table:table-cell>
        </table:table-row>
      </table:table>
      <text:list xml:id="list379303797" text:style-name="L9">
        <text:list-item>
          <text:p text:style-name="P81"><text:span text:style-name="T201">“</text:span><text:span text:style-name="T202">low</text:span><text:span text:style-name="T203">*</text:span><text:span text:style-name="T202"> part</text:span><text:span text:style-name="T203">*</text:span><text:span text:style-name="T202"> of the earth” </text:span><text:span text:style-name="T204">is</text:span><text:span text:style-name="T202"> a phrase that </text:span><text:span text:style-name="T205">in 4 out of 5 </text:span><text:span text:style-name="T206">instances</text:span><text:span text:style-name="T207"> refer</text:span><text:span text:style-name="T208">s</text:span><text:span text:style-name="T207"> to the </text:span><text:span text:style-name="T209">temporary abode of the dead.</text:span></text:p>
          <text:list>
            <text:list-item>
              <text:p text:style-name="P81"><text:span text:style-name="T15">Psalm 63:9,10</text:span><text:span text:style-name="T210">, </text:span><text:span text:style-name="T15">Isaiah 44:22,23</text:span><text:span text:style-name="T211">, </text:span><text:span text:style-name="T15">Ephesians 4:9</text:span><text:span text:style-name="T212">, </text:span><text:span text:style-name="T213">and</text:span><text:span text:style-name="T211"> </text:span><text:span text:style-name="T15">Ezekiel 26:20</text:span><text:span text:style-name="T214"> </text:span><text:span text:style-name="T213">(H8482, G2737).</text:span></text:p>
            </text:list-item>
            <text:list-item>
              <text:p text:style-name="P82"><text:span text:style-name="T215">Curiously, </text:span><text:span text:style-name="T216">the phrase “lowest parts</text:span><text:span text:style-name="T217">H8482</text:span><text:span text:style-name="T216"> of the earth” </text:span><text:span text:style-name="T215">in </text:span><text:span text:style-name="T218">Psalm 139:15 </text:span><text:span text:style-name="T216">refer</text:span><text:span text:style-name="T219">s</text:span><text:span text:style-name="T216"> </text:span><text:span text:style-name="T220">figuratively </text:span><text:span text:style-name="T216">to “the womb”.</text:span></text:p>
            </text:list-item>
          </text:list>
        </text:list-item>
        <text:list-item>
          <text:p text:style-name="P83">I<text:span text:style-name="T221">n it’s literal sense, i</text:span>t is equivalent to the phrase “nether/<text:span text:style-name="T222">lower</text:span> parts of the earth”<text:span text:style-name="T223">.</text:span></text:p>
        </text:list-item>
        <text:list-item>
          <text:p text:style-name="P84">But, what is this phrase <text:span text:style-name="T224">that</text:span> <text:span text:style-name="T225">He </text:span>“<text:span text:style-name="T100">led captivity captive</text:span>”?</text:p>
          <text:list>
            <text:list-item>
              <text:p text:style-name="P84">Who was captive, where <text:span text:style-name="T226">were</text:span> they, <text:span text:style-name="T227">and where did Jesus take them</text:span>?</text:p>
            </text:list-item>
          </text:list>
        </text:list-item>
      </text:list>
      <text:p text:style-name="P85"/>
      <text:p text:style-name="P85"/>
      <text:p text:style-name="P86">The<text:span text:style-name="T228">m that </text:span><text:span text:style-name="T229">were</text:span><text:span text:style-name="T228"> bound</text:span></text:p>
      <text:p text:style-name="P87"/>
      <table:table table:name="Table15" table:style-name="Table15">
        <table:table-column table:style-name="Table15.A"/>
        <table:table-row>
          <table:table-cell table:style-name="Table15.A1" office:value-type="string">
            <text:p text:style-name="P88"><text:span text:style-name="T15">Job 3:17-19</text:span><text:span text:style-name="T91"><text:line-break/></text:span><text:span text:style-name="T230">17</text:span><text:span text:style-name="T231"> There the wicked cease from troubling; and there the weary be at rest. <text:line-break/></text:span><text:span text:style-name="T230">18</text:span><text:span text:style-name="T231"> There the </text:span><text:span text:style-name="T232">prisoners</text:span><text:span text:style-name="T233">H615</text:span><text:span text:style-name="T231"> rest together; they hear not the voice of the oppressor. <text:line-break/></text:span><text:span text:style-name="T230">19</text:span><text:span text:style-name="T231"> The small and great are there; and the servant is free from his master.</text:span></text:p>
          </table:table-cell>
        </table:table-row>
      </table:table>
      <text:list text:style-name="L10">
        <text:list-item>
          <text:p text:style-name="P89">When Job lamented the day of his birth and longed for death, he referred to the dead as “prisoners”.</text:p>
        </text:list-item>
        <text:list-item>
          <text:p text:style-name="P89">Why <text:span text:style-name="T234">did</text:span> <text:span text:style-name="T234">the Holy Ghost call </text:span><text:span text:style-name="T235">the dead </text:span><text:span text:style-name="T234">prisoners?</text:span></text:p>
        </text:list-item>
      </text:list>
      <text:p text:style-name="P87"/>
      <text:p text:style-name="P87"/>
      <text:p text:style-name="P90">Which prison?</text:p>
      <text:p text:style-name="P91"/>
      <table:table table:name="Table41" table:style-name="Table41">
        <table:table-column table:style-name="Table41.A"/>
        <table:table-row>
          <table:table-cell table:style-name="Table41.A1" office:value-type="string">
            <text:p text:style-name="P92">Isaiah 14:17</text:p>
            <text:p text:style-name="P93">That made the world as a wilderness, and destroyed the cities thereof; that opened not <text:span text:style-name="T33">the house of his prisoners</text:span>?</text:p>
          </table:table-cell>
        </table:table-row>
        <table:table-row>
          <table:table-cell table:style-name="Table41.A2" office:value-type="string">
            <text:p text:style-name="P92">Isaiah 42:7</text:p>
            <text:p text:style-name="P93"><text:span text:style-name="T32">7</text:span> To open the blind eyes, <text:span text:style-name="T33">to bring out the prisoners from the prison</text:span>, and them that sit in darkn<text:span text:style-name="T40">ess out of the prison house.</text:span></text:p>
          </table:table-cell>
        </table:table-row>
        <table:table-row>
          <table:table-cell table:style-name="Table41.A2" office:value-type="string">
            <text:p text:style-name="P92">Isaiah 49:9</text:p>
            <text:p text:style-name="P93">That thou mayest say to <text:span text:style-name="T33">the prisoners, Go forth</text:span>; to them that are in darkness, Shew yourselves. They shall feed in the ways, a<text:span text:style-name="T40">nd their pastures shall be in all high places.</text:span></text:p>
          </table:table-cell>
        </table:table-row>
        <table:table-row>
          <table:table-cell table:style-name="Table41.A2" office:value-type="string">
            <text:p text:style-name="P92">Zechariah 9:11-12</text:p>
            <text:p text:style-name="P94"><text:span text:style-name="T32">11</text:span> As for thee also, by the blood of thy covenant <text:span text:style-name="T33">I have sent forth thy prisoners out of the pit</text:span> wherein is no water.</text:p>
            <text:p text:style-name="P94"><text:span text:style-name="T32">12</text:span> Turn you to the strong hold, <text:span text:style-name="T33">ye prisoners of hope</text:span>: even to day do I declare that I will render double unto thee;</text:p>
          </table:table-cell>
        </table:table-row>
        <table:table-row>
          <table:table-cell table:style-name="Table41.A2" office:value-type="string">
            <text:p text:style-name="P95">Isaiah 24:21</text:p>
            <text:p text:style-name="P94">And they shall be gathered together, as prisoners are gathered in the pit, and shall be shut up in <text:span text:style-name="T33">the prison</text:span>, and after many days shall they be visited.</text:p>
          </table:table-cell>
        </table:table-row>
      </table:table>
      <text:list text:style-name="L11">
        <text:list-item>
          <text:p text:style-name="P96">There are many other verses about spiritual prisoners <text:span text:style-name="T236">and we will look at some of them closer later on.</text:span></text:p>
        </text:list-item>
        <text:list-item>
          <text:p text:style-name="P97">Note that “prisoners” is used <text:span text:style-name="T237">not only</text:span> to refer to those trapped by their own sin and those waiting in hell <text:span text:style-name="T237">but also</text:span><text:span text:style-name="T238"> </text:span><text:span text:style-name="T237">a prisoner in the physical sense </text:span><text:span text:style-name="T239">which we are most familiar with.</text:span></text:p>
        </text:list-item>
      </text:list>
      <text:p text:style-name="P98"><text:soft-page-break/><text:span text:style-name="T240">W</text:span><text:span text:style-name="T241">hom shall I send?</text:span></text:p>
      <text:p text:style-name="P99"/>
      <table:table table:name="Table17" table:style-name="Table17">
        <table:table-column table:style-name="Table17.A"/>
        <table:table-row>
          <table:table-cell table:style-name="Table17.A1" office:value-type="string">
            <text:p text:style-name="P100"><text:span text:style-name="T15">Hosea 13:14</text:span><text:span text:style-name="T91"><text:line-break/></text:span><text:span text:style-name="T242">I</text:span><text:span text:style-name="T115"> will </text:span><text:span text:style-name="T92">ransom</text:span><text:span text:style-name="T115"> them from </text:span><text:span text:style-name="T92">the power of the grave</text:span><text:span text:style-name="T115">; </text:span><text:span text:style-name="T242">I</text:span><text:span text:style-name="T115"> will </text:span><text:span text:style-name="T92">redeem</text:span><text:span text:style-name="T115"> them from </text:span><text:span text:style-name="T92">death</text:span><text:span text:style-name="T115">: O</text:span><text:span text:style-name="T91"> death, </text:span><text:span text:style-name="T242">I</text:span><text:span text:style-name="T91"> will be thy plagues; O grave, </text:span><text:span text:style-name="T242">I</text:span><text:span text:style-name="T91"> will be thy destruction: repentance shall be hid from </text:span><text:span text:style-name="T242">mine</text:span><text:span text:style-name="T91"> eyes.</text:span></text:p>
          </table:table-cell>
        </table:table-row>
      </table:table>
      <text:list text:style-name="L12">
        <text:list-item>
          <text:p text:style-name="P101"><text:span text:style-name="T243">Among judgments against Israel, Ephraim, and Samaria</text:span><text:span text:style-name="T39"> </text:span>we<text:span text:style-name="T244"> </text:span><text:span text:style-name="T245">can </text:span><text:span text:style-name="T244">see a prophecy that </text:span><text:span text:style-name="T246">the LORD </text:span><text:span text:style-name="T244">God </text:span><text:span text:style-name="T247">Himself </text:span><text:span text:style-name="T244">will </text:span><text:span text:style-name="T248">(future tense)</text:span><text:span text:style-name="T244"> </text:span><text:span text:style-name="T249">ransom</text:span><text:span text:style-name="T250"> them</text:span><text:span text:style-name="T251"> </text:span><text:span text:style-name="T250">from the </text:span><text:span text:style-name="T249">power</text:span><text:span text:style-name="T250"> of the grave. </text:span><text:span text:style-name="T252">He will </text:span><text:span text:style-name="T253">(future tense)</text:span><text:span text:style-name="T252"> </text:span><text:span text:style-name="T254">redeem</text:span><text:span text:style-name="T252"> them from </text:span><text:span text:style-name="T254">death</text:span><text:span text:style-name="T252">.</text:span></text:p>
        </text:list-item>
        <text:list-item>
          <text:p text:style-name="P102"><text:span text:style-name="T255">T</text:span><text:span text:style-name="T256">he grave ha</text:span><text:span text:style-name="T255">ving</text:span><text:span text:style-name="T256"> power over the dead </text:span><text:span text:style-name="T257">makes them</text:span><text:span text:style-name="T258"> </text:span><text:span text:style-name="T256">prisoners.</text:span></text:p>
        </text:list-item>
      </text:list>
      <text:p text:style-name="P51"/>
      <text:p text:style-name="P51"/>
      <table:table table:name="Table33" table:style-name="Table33">
        <table:table-column table:style-name="Table33.A"/>
        <table:table-row>
          <table:table-cell table:style-name="Table33.A1" office:value-type="string">
            <text:p text:style-name="P103">Hosea 6:2</text:p>
            <text:p text:style-name="P104">After two days will he revive <text:span text:style-name="T33">us</text:span>: in <text:span text:style-name="T180">the third day</text:span> he will raise <text:span text:style-name="T33">us</text:span> up, and <text:span text:style-name="T33">we</text:span> shall live in his sight.</text:p>
          </table:table-cell>
        </table:table-row>
      </table:table>
      <text:list text:style-name="L13">
        <text:list-item>
          <text:p text:style-name="P105"><text:span text:style-name="T259">Again in </text:span><text:span text:style-name="T15">Hosea</text:span><text:span text:style-name="T259">, we see a very specific, </text:span><text:span text:style-name="T260">seemingly</text:span><text:span text:style-name="T259"> out of place </text:span><text:span text:style-name="T261">prophecy</text:span><text:span text:style-name="T259"> to </text:span><text:span text:style-name="T262">a plurality of people </text:span><text:span text:style-name="T259">being resurrected on </text:span><text:span text:style-name="T263">which day? The third </text:span><text:span text:style-name="T264">day </text:span><text:span text:style-name="T265">(</text:span><text:span text:style-name="T15">John 2:19</text:span><text:span text:style-name="T265">).</text:span></text:p>
        </text:list-item>
        <text:list-item>
          <text:p text:style-name="P106"><text:span text:style-name="T266">Where else, in the entire Bible, can we apply this prophecy </text:span><text:span text:style-name="T267">besides</text:span><text:span text:style-name="T266"> </text:span><text:span text:style-name="T15">Mat</text:span><text:span text:style-name="T268">thew</text:span><text:span text:style-name="T15"> 27:52,53</text:span><text:span text:style-name="T266">?</text:span></text:p>
        </text:list-item>
      </text:list>
      <text:p text:style-name="P51"/>
      <text:p text:style-name="P51"/>
      <table:table table:name="Table34" table:style-name="Table34">
        <table:table-column table:style-name="Table34.A"/>
        <table:table-row>
          <table:table-cell table:style-name="Table34.A1" office:value-type="string">
            <text:p text:style-name="P103">Psalm 49:15</text:p>
            <text:p text:style-name="P104">But God will <text:span text:style-name="T33">redeem</text:span> my soul from the power of the grave<text:span text:style-name="T269">H7585</text:span>: for he shall receive me. Selah.</text:p>
          </table:table-cell>
        </table:table-row>
      </table:table>
      <text:list text:style-name="L14">
        <text:list-item>
          <text:p text:style-name="P107">Yet another reference to the power that the grave <text:span text:style-name="T100">had</text:span><text:span text:style-name="T270"> over souls and of one being </text:span><text:span text:style-name="T271">bought back</text:span><text:span text:style-name="T270"> </text:span><text:span text:style-name="T272">from that.</text:span></text:p>
        </text:list-item>
        <text:list-item>
          <text:p text:style-name="P108"><text:span text:style-name="T273">Note that </text:span><text:span text:style-name="T274">H7585 is the Hebrew word “Sheol” (</text:span><text:span text:style-name="T275">English:</text:span><text:span text:style-name="T274"> </text:span><text:span text:style-name="T276">pit</text:span>, <text:span text:style-name="T276">hell</text:span><text:span text:style-name="T274">), </text:span><text:span text:style-name="T273">the temporary abode of the dead.</text:span></text:p>
        </text:list-item>
      </text:list>
      <text:p text:style-name="P51"/>
      <text:p text:style-name="P51"/>
      <text:p text:style-name="P109"><text:span text:style-name="T277">W</text:span>ho will go for us?</text:p>
      <text:p text:style-name="P110"/>
      <table:table table:name="Table22" table:style-name="Table22">
        <table:table-column table:style-name="Table22.A"/>
        <table:table-row>
          <table:table-cell table:style-name="Table22.A1" office:value-type="string">
            <text:p text:style-name="P111"><text:span text:style-name="T15">Psalms 69:13-</text:span><text:span text:style-name="T278">15</text:span> <text:span text:style-name="T279">(God the Son speaking to God the Father </text:span><text:span text:style-name="T280">through</text:span><text:span text:style-name="T281"> God the Holy Ghost by the hand of </text:span><text:span text:style-name="T282">the swe</text:span><text:span text:style-name="T283">e</text:span><text:span text:style-name="T282">t psalmist of Israel</text:span><text:span text:style-name="T279">)</text:span></text:p>
            <text:p text:style-name="P111"><text:span text:style-name="T284">13</text:span><text:span text:style-name="T285"> </text:span>But as for me, my prayer is unto thee, O LORD, <text:span text:style-name="T33">in an acceptable time</text:span>: O God, in the multitude of thy mercy <text:span text:style-name="T286">hear me</text:span>, in the truth of thy salvation.</text:p>
            <text:p text:style-name="P111"><text:span text:style-name="T284">1</text:span><text:span text:style-name="T32">4</text:span> Deliver me out of the mire, and let me not sink: let me be delivered from them that hate me, and out of the deep waters.</text:p>
            <text:p text:style-name="P111"><text:span text:style-name="T32">15</text:span> Let not the waterflood overflow me, <text:span text:style-name="T180">neither let the deep swallow me up</text:span>, and <text:span text:style-name="T287">let not the pit shut her mouth upon me.</text:span></text:p>
          </table:table-cell>
        </table:table-row>
        <table:table-row>
          <table:table-cell table:style-name="Table22.A2" office:value-type="string">
            <text:p text:style-name="P111"><text:span text:style-name="T15">Isaiah 49:8,</text:span><text:span text:style-name="T288">9</text:span> <text:span text:style-name="T279">(God the Father’s response)</text:span></text:p>
            <text:p text:style-name="P111"><text:span text:style-name="T289">8</text:span><text:span text:style-name="T290"> </text:span>Thus saith the LORD, <text:span text:style-name="T33">In an acceptable time</text:span> have <text:span text:style-name="T286">I heard thee</text:span>, and <text:span text:style-name="T33">in a day of salvation</text:span> have I helped thee: and I will preserve thee, and give thee for a covenant of the people, to establish the earth, to cause to inherit the desolate heritages;</text:p>
            <text:p text:style-name="P111"><text:span text:style-name="T32">9</text:span> <text:span text:style-name="T33">That thou mayest say to the prisoners, Go forth</text:span>; <text:span text:style-name="T180">to them that are in darkness, Shew yourselves</text:span>. They shall feed in <text:span text:style-name="T291">the ways</text:span>, and their pastures shall be <text:span text:style-name="T291">in all high places</text:span>.</text:p>
          </table:table-cell>
        </table:table-row>
        <table:table-row>
          <table:table-cell table:style-name="Table22.A2" office:value-type="string">
            <text:p text:style-name="P112">Acts 2:24</text:p>
            <text:p text:style-name="P111">Whom God hath raised up, <text:span text:style-name="T180">having loosed the pains of death</text:span>: because <text:span text:style-name="T292">it was not possible that he should be holden of it.</text:span></text:p>
          </table:table-cell>
        </table:table-row>
      </table:table>
      <text:list text:style-name="L15">
        <text:list-item>
          <text:p text:style-name="P113"><text:span text:style-name="T293">Those in hell would be kept there until </text:span><text:span text:style-name="T294">the</text:span><text:span text:style-name="T293"> acceptable time </text:span><text:span text:style-name="T294">(</text:span><text:span text:style-name="T15">1 John 2:2</text:span><text:span text:style-name="T294">).</text:span></text:p>
          <text:list>
            <text:list-item>
              <text:p text:style-name="P114">When would that acceptable time be?</text:p>
            </text:list-item>
          </text:list>
        </text:list-item>
        <text:list-item>
          <text:p text:style-name="P113"><text:span text:style-name="T295">Jesus’ praye</text:span><text:span text:style-name="T296">r in </text:span><text:span text:style-name="T15">Psa 69</text:span><text:span text:style-name="T296"> was written</text:span><text:span text:style-name="T295"> </text:span><text:span text:style-name="T296">roughly</text:span><text:span text:style-name="T297"> 1,000 years in advance</text:span><text:span text:style-name="T295"> and God the Father gave </text:span><text:span text:style-name="T298">H</text:span><text:span text:style-name="T295">im more than He asked for </text:span><text:span text:style-name="T299">(</text:span><text:span text:style-name="T15">Eph 3:20,21</text:span><text:span text:style-name="T39">).</text:span></text:p>
        </text:list-item>
      </text:list>
      <text:p text:style-name="Standard"/>
      <text:p text:style-name="P51"/>
      <text:p text:style-name="P115"><text:soft-page-break/><text:span text:style-name="T300">T</text:span><text:span text:style-name="T301">ransfer of </text:span><text:span text:style-name="T302">authority</text:span></text:p>
      <text:p text:style-name="P51"/>
      <table:table table:name="Table11" table:style-name="Table11">
        <table:table-column table:style-name="Table11.A"/>
        <table:table-row>
          <table:table-cell table:style-name="Table11.A1" office:value-type="string">
            <text:p text:style-name="P116">Revelation 1:18</text:p>
            <text:p text:style-name="P117">I am <text:span text:style-name="T33">he that liveth, and was dead</text:span>; and, behold, <text:span text:style-name="T33">I am alive for evermore</text:span>, Amen; <text:span text:style-name="T33">and have the keys of hell</text:span><text:span text:style-name="T303">G86</text:span><text:span text:style-name="T33"> and of death</text:span>.</text:p>
          </table:table-cell>
        </table:table-row>
        <table:table-row>
          <table:table-cell table:style-name="Table11.A2" office:value-type="string">
            <text:p text:style-name="P118">Matthew 28:18</text:p>
            <text:p text:style-name="Standard">And Jesus came and spake unto them, saying, <text:span text:style-name="T304">All power is given unto me</text:span><text:span text:style-name="T305"> in heaven and in earth.</text:span></text:p>
          </table:table-cell>
        </table:table-row>
      </table:table>
      <text:list text:style-name="L16">
        <text:list-item>
          <text:p text:style-name="P119"><text:span text:style-name="T306">W</text:span><text:span text:style-name="T307">hy did Jesus tell us this</text:span><text:span text:style-name="T308"> only</text:span><text:span text:style-name="T307"> </text:span><text:span text:style-name="T309">after</text:span><text:span text:style-name="T310"> His resurrection</text:span><text:span text:style-name="T307">?</text:span></text:p>
        </text:list-item>
        <text:list-item>
          <text:p text:style-name="P120"><text:span text:style-name="T311">In order for that</text:span><text:span text:style-name="T312"> authority </text:span><text:span text:style-name="T311">to</text:span><text:span text:style-name="T312"> be transferred </text:span><text:span text:style-name="T311">the proper atoning sacrifice had to be made afterwhich</text:span><text:span text:style-name="T312"> </text:span><text:span text:style-name="T313">God the Father was satisfied </text:span><text:span text:style-name="T311">and then t</text:span><text:span text:style-name="T314">he</text:span><text:span text:style-name="T315"> </text:span><text:span text:style-name="T316">keys</text:span><text:span text:style-name="T317"> (</text:span><text:span text:style-name="T316">authority</text:span><text:span text:style-name="T317">)</text:span><text:span text:style-name="T315"> </text:span><text:span text:style-name="T314">over the gates of hell and of death </text:span><text:span text:style-name="T315">was transferred </text:span><text:span text:style-name="T318">to Jesus </text:span><text:span text:style-name="T319">whereupon He became the author of eternal salvation (</text:span><text:span text:style-name="T15">Hebrews 5:9</text:span><text:span text:style-name="T319">).</text:span></text:p>
        </text:list-item>
      </text:list>
      <text:p text:style-name="P121"/>
      <text:p text:style-name="Standard"/>
      <text:p text:style-name="P122">Who had the power of death before Jesus?</text:p>
      <text:p text:style-name="Standard"/>
      <table:table table:name="Table32" table:style-name="Table32">
        <table:table-column table:style-name="Table32.A"/>
        <table:table-row>
          <table:table-cell table:style-name="Table32.A1" office:value-type="string">
            <text:p text:style-name="P116">Hebrews 2:14</text:p>
            <text:p text:style-name="P123">Forasmuch then as the children are partakers of flesh and blood, he also himself likewise took part of the same; that through death he might <text:span text:style-name="T33">destroy him that had the power of death, that is, the devil</text:span>;</text:p>
          </table:table-cell>
        </table:table-row>
        <table:table-row>
          <table:table-cell table:style-name="Table32.A2" office:value-type="string">
            <text:p text:style-name="P124">1 John 3:8</text:p>
            <text:p text:style-name="Standard">He that committeth sin is of the devil; for the devil sinneth from the beginning. <text:span text:style-name="T33">For this purpose the Son of God was manifested, that he might destroy the works of the devil</text:span>.</text:p>
          </table:table-cell>
        </table:table-row>
        <table:table-row>
          <table:table-cell table:style-name="Table32.A2" office:value-type="string">
            <text:p text:style-name="P125">1 Corinthians 15:26</text:p>
            <text:p text:style-name="Standard">The last enemy that shall be destroyed is death.</text:p>
          </table:table-cell>
        </table:table-row>
      </table:table>
      <text:p text:style-name="P51"/>
      <text:p text:style-name="P126"/>
      <text:p text:style-name="P127">The scales of Justice are no longer wanting</text:p>
      <text:p text:style-name="P126"/>
      <table:table table:name="Table36" table:style-name="Table36">
        <table:table-column table:style-name="Table36.A"/>
        <table:table-row>
          <table:table-cell table:style-name="Table36.A1" office:value-type="string">
            <text:p text:style-name="P128">Isaiah 53:11</text:p>
            <text:p text:style-name="P129">He shall see of the travail of his<text:span text:style-name="T320"> </text:span>soul, and <text:span text:style-name="T33">shall be satisfied</text:span>: by his knowledge shall my righteous servant<text:span text:style-name="T321"> </text:span>justify many; for he shall bear their iniquities.</text:p>
          </table:table-cell>
        </table:table-row>
        <table:table-row>
          <table:table-cell table:style-name="Table36.A2" office:value-type="string">
            <text:p text:style-name="P130"><text:span text:style-name="T320">God the Father </text:span>shall see of the travail of <text:span text:style-name="T320">Jesus’ </text:span>soul, and <text:span text:style-name="T322">God the Father</text:span> <text:span text:style-name="T33">shall be satisfied</text:span>: by <text:span text:style-name="T323">Jesus’</text:span> knowledge shall <text:span text:style-name="T324">God the Father’s</text:span> righteous servant <text:span text:style-name="T321">Jesus </text:span>justify many; for <text:span text:style-name="T322">Jesus</text:span> shall bear their iniquities.</text:p>
          </table:table-cell>
        </table:table-row>
      </table:table>
      <text:list text:style-name="L17">
        <text:list-item>
          <text:p text:style-name="P131"><text:span text:style-name="T325">After </text:span><text:span text:style-name="T326">suffering a multiude of injustice and then </text:span><text:span text:style-name="T327">His </text:span><text:span text:style-name="T325">victory on the cross </text:span><text:span text:style-name="T327">(</text:span><text:span text:style-name="T328">John 19:30</text:span><text:span text:style-name="T327">)</text:span><text:span text:style-name="T325">, </text:span><text:span text:style-name="T329">God the Father </text:span><text:span text:style-name="T325">could </text:span><text:span text:style-name="T329">then transfer all authority to Jesus </text:span><text:span text:style-name="T330">(</text:span><text:span text:style-name="T15">Mat 28:18</text:span><text:span text:style-name="T330">)</text:span><text:span text:style-name="T329"> and eventually Jesus will give it back (</text:span><text:span text:style-name="T15">1 Co</text:span><text:span text:style-name="T328">rinthians</text:span><text:span text:style-name="T15"> 15:22-28</text:span><text:span text:style-name="T329">).</text:span></text:p>
        </text:list-item>
      </text:list>
      <text:p text:style-name="Standard"/>
      <text:p text:style-name="Standard"/>
      <text:p text:style-name="P132">Everything changes</text:p>
      <text:p text:style-name="Standard"/>
      <table:table table:name="Table25" table:style-name="Table25">
        <table:table-column table:style-name="Table25.A"/>
        <table:table-row>
          <table:table-cell table:style-name="Table25.A1" office:value-type="string">
            <text:p text:style-name="P133">Luke 24:49</text:p>
            <text:p text:style-name="P134">And, behold, I send the promise of my Father upon you: but tarry ye in the city of Jerusalem, until ye be endued with power from on high.</text:p>
          </table:table-cell>
        </table:table-row>
        <table:table-row>
          <table:table-cell table:style-name="Table25.A2" office:value-type="string">
            <text:p text:style-name="P133">Acts <text:span text:style-name="T331">1:4, </text:span>2:16-21, Joel 2:28-32</text:p>
          </table:table-cell>
        </table:table-row>
      </table:table>
      <text:list text:style-name="L18">
        <text:list-item>
          <text:p text:style-name="P135"><text:span text:style-name="T332">That Spirit that God poured out </text:span><text:span text:style-name="T333">(</text:span><text:span text:style-name="T328">Acts 2:41</text:span><text:span text:style-name="T39">, </text:span><text:span text:style-name="T328">4:4</text:span><text:span text:style-name="T39">, </text:span><text:span text:style-name="T328">19:18,19</text:span><text:span text:style-name="T39">, </text:span><text:span text:style-name="T328">21:20</text:span><text:span text:style-name="T333">)</text:span><text:span text:style-name="T332"> and that power from on high is the Holy Ghost </text:span><text:span text:style-name="T334">and his ministry and that prophecy continues today.</text:span></text:p>
        </text:list-item>
        <text:list-item>
          <text:p text:style-name="P136"><text:span text:style-name="T334">Notice that only part of the prophecy in </text:span><text:span text:style-name="T328">Joel</text:span><text:span text:style-name="T334"> has been fulfilled so far.</text:span></text:p>
        </text:list-item>
      </text:list>
      <text:p text:style-name="P137"/>
      <text:p text:style-name="P138"><text:soft-page-break/><text:span text:style-name="T335">Another prophecy from Jesus </text:span><text:span text:style-name="T336">connected</text:span><text:span text:style-name="T335"> to</text:span><text:span text:style-name="T337"> </text:span><text:span text:style-name="T15">Hosea 13:14</text:span></text:p>
      <text:p text:style-name="Standard"/>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P139">Matthew 16:18</text:p>
          </table:table-cell>
          <table:covered-table-cell/>
          <table:table-cell table:style-name="Table12.C1" office:value-type="string">
            <text:p text:style-name="P140">Tense, voice, mood</text:p>
          </table:table-cell>
        </table:table-row>
        <table:table-row>
          <table:table-cell table:style-name="Table12.A2" table:number-rows-spanned="4" office:value-type="string">
            <text:p text:style-name="P141"><text:span text:style-name="T338">And I say also unto thee, That thou art Peter</text:span><text:span text:style-name="T305">, </text:span><text:span text:style-name="T339">and upon this rock I will build my church; and the gates of hell</text:span><text:span text:style-name="T340">G86</text:span><text:span text:style-name="T339"> shall not prevail against it</text:span><text:span text:style-name="T341">.</text:span></text:p>
          </table:table-cell>
          <table:table-cell table:style-name="Table12.A2" office:value-type="string">
            <text:p text:style-name="P142">I say</text:p>
          </table:table-cell>
          <table:table-cell table:style-name="Table12.C2" office:value-type="string">
            <text:p text:style-name="P143"><text:span text:style-name="T287">Present</text:span>, <text:span text:style-name="T342">a</text:span><text:span text:style-name="T343">ctive, </text:span><text:span text:style-name="T342">i</text:span><text:span text:style-name="T343">ndicative</text:span></text:p>
          </table:table-cell>
        </table:table-row>
        <table:table-row>
          <table:covered-table-cell table:style-name="Table12.A2"/>
          <table:table-cell table:style-name="Table12.A2" office:value-type="string">
            <text:p text:style-name="P144">art</text:p>
          </table:table-cell>
          <table:table-cell table:style-name="Table12.C2" office:value-type="string">
            <text:p text:style-name="P145"><text:span text:style-name="T287">Present</text:span>, <text:span text:style-name="T342">i</text:span>ndicative</text:p>
          </table:table-cell>
        </table:table-row>
        <table:table-row>
          <table:covered-table-cell table:style-name="Table12.A2"/>
          <table:table-cell table:style-name="Table12.A2" office:value-type="string">
            <text:p text:style-name="P146">I will build</text:p>
          </table:table-cell>
          <table:table-cell table:style-name="Table12.C2" office:value-type="string">
            <text:p text:style-name="P143"><text:span text:style-name="T34">Future</text:span>, <text:span text:style-name="T342">a</text:span><text:span text:style-name="T343">ctive, </text:span><text:span text:style-name="T342">i</text:span><text:span text:style-name="T343">ndicative</text:span></text:p>
          </table:table-cell>
        </table:table-row>
        <table:table-row>
          <table:covered-table-cell table:style-name="Table12.A2"/>
          <table:table-cell table:style-name="Table12.A2" office:value-type="string">
            <text:p text:style-name="P146">prevail against</text:p>
          </table:table-cell>
          <table:table-cell table:style-name="Table12.C2" office:value-type="string">
            <text:p text:style-name="P145"><text:span text:style-name="T34">Future</text:span>, <text:span text:style-name="T342">a</text:span>ctive, <text:span text:style-name="T342">i</text:span>ndicative</text:p>
          </table:table-cell>
        </table:table-row>
      </table:table>
      <text:list text:style-name="L19">
        <text:list-item>
          <text:p text:style-name="P147"><text:span text:style-name="T344">W</text:span><text:span text:style-name="T345">hen Jesus said “this rock” He was referring to what </text:span><text:span text:style-name="T346">Simon </text:span><text:span text:style-name="T345">Peter </text:span><text:span text:style-name="T347">had just </text:span><text:span text:style-name="T345">said in </text:span><text:span text:style-name="T348">v</text:span><text:span text:style-name="T15">16</text:span><text:span text:style-name="T349"> </text:span><text:span text:style-name="T348">“Thou ar</text:span><text:span text:style-name="T350">t</text:span><text:span text:style-name="T348"> the Christ, the Son of the living God”.</text:span></text:p>
          <text:list>
            <text:list-item>
              <text:p text:style-name="P148"><text:span text:style-name="T91">“</text:span><text:span text:style-name="T351">t</text:span><text:span text:style-name="T352">his rock” is none other than the Rock </text:span><text:span text:style-name="T353">of Moses</text:span><text:span text:style-name="T352"> (</text:span><text:span text:style-name="T15">Deu 32:4</text:span><text:span text:style-name="T352">), the rock of David (</text:span><text:span text:style-name="T15">Psa 18:31, 46</text:span><text:span text:style-name="T352">), </text:span><text:span text:style-name="T353">of Israel</text:span><text:span text:style-name="T352"> (</text:span><text:span text:style-name="T15">Psa 78:35</text:span><text:span text:style-name="T352">), </text:span><text:span text:style-name="T354">the rock of offense to the disobedient that reject </text:span><text:span text:style-name="T355">the chief corner stone</text:span><text:span text:style-name="T354"> (</text:span><text:span text:style-name="T15">Isa 8:14</text:span><text:span text:style-name="T354">, </text:span><text:span text:style-name="T15">Rom 9:33</text:span><text:span text:style-name="T354">, </text:span><text:span text:style-name="T15">1Pe 2:8</text:span><text:span text:style-name="T344">), and the Rock that followed Israel through the wilderness (</text:span><text:span text:style-name="T15">1Co 10:4</text:span><text:span text:style-name="T344">).</text:span></text:p>
            </text:list-item>
          </text:list>
        </text:list-item>
        <text:list-item>
          <text:p text:style-name="P149">Why would Jesus mention <text:span text:style-name="T356">specifically </text:span>that the<text:span text:style-name="T226"> </text:span><text:span text:style-name="T357">gates</text:span><text:span text:style-name="T226"> </text:span>of hell would not<text:span text:style-name="T358"> </text:span>prevail against His church?</text:p>
          <text:list>
            <text:list-item>
              <text:p text:style-name="P150"><text:span text:style-name="T359">He didn’t mention hell because </text:span><text:span text:style-name="T360">of that being where</text:span><text:span text:style-name="T359"> the throne/stronghold of Satan </text:span><text:span text:style-name="T360">is, </text:span><text:span text:style-name="T359">like the world would have you believe, because he isn’t there (</text:span><text:span text:style-name="T15">1Pe 5:8</text:span><text:span text:style-name="T359">, </text:span><text:span text:style-name="T15">Rev 12:12</text:span><text:span text:style-name="T359">).</text:span></text:p>
            </text:list-item>
            <text:list-item>
              <text:p text:style-name="P151"><text:span text:style-name="T361">H</text:span><text:span text:style-name="T362">e mentioned the gates of hell because something was there that belonged to Him </text:span><text:span text:style-name="T363">and He would rescue them from hell just like God the Father rescued Jesus from hell</text:span><text:span text:style-name="T362">.</text:span></text:p>
            </text:list-item>
          </text:list>
        </text:list-item>
      </text:list>
      <text:p text:style-name="P152"/>
      <text:p text:style-name="P152"/>
      <text:p text:style-name="P153"><text:span text:style-name="T70">W</text:span><text:span text:style-name="T364">hat was Jesus talking about here</text:span><text:span text:style-name="T70">?</text:span></text:p>
      <text:p text:style-name="P51"/>
      <table:table table:name="Table38" table:style-name="Table38">
        <table:table-column table:style-name="Table38.A"/>
        <table:table-row>
          <table:table-cell table:style-name="Table38.A1" office:value-type="string">
            <text:p text:style-name="P154"><text:span text:style-name="T15">John 5:25-29</text:span><text:span text:style-name="T305"><text:line-break/></text:span><text:span text:style-name="T69">25</text:span><text:span text:style-name="T305"> Verily, verily, I say unto you, </text:span><text:span text:style-name="T365">The hour is coming, and now is</text:span><text:span text:style-name="T305">, when </text:span><text:span text:style-name="T304">the dead</text:span> <text:span text:style-name="T365">shall</text:span> <text:span text:style-name="T304">hear the voice of the Son of God</text:span><text:span text:style-name="T305">: and they that hear shall live. <text:line-break/></text:span><text:span text:style-name="T69">26</text:span><text:span text:style-name="T305"> For as the Father hath life in himself; so hath he given to the Son to have life in himself; <text:line-break/></text:span><text:span text:style-name="T69">27</text:span><text:span text:style-name="T305"> And hath given him authority to execute judgment also, because he is the Son of man. <text:line-break/></text:span><text:span text:style-name="T69">28</text:span><text:span text:style-name="T305"> Marvel not at this: for </text:span><text:span text:style-name="T366">the hour is coming</text:span><text:span text:style-name="T305">, in the whic</text:span><text:span text:style-name="T341">h all that are in the graves shall hear his voice, </text:span><text:span text:style-name="T305"><text:line-break/></text:span><text:span text:style-name="T69">29</text:span><text:span text:style-name="T305"> And shall come forth; they that have done good, unto the resurrection of life; and they that have done evil, unto the resurrection of damnation.</text:span></text:p>
          </table:table-cell>
        </table:table-row>
      </table:table>
      <text:list text:style-name="L20">
        <text:list-item>
          <text:p text:style-name="P155">Notice in <text:span text:style-name="T367">v</text:span><text:span text:style-name="T368">25</text:span><text:span text:style-name="T369"> </text:span><text:span text:style-name="T370">how </text:span><text:span text:style-name="T371">“</text:span><text:span text:style-name="T372">The hour is coming, and now is</text:span><text:span text:style-name="T373">” is </text:span><text:span text:style-name="T374">both</text:span><text:span text:style-name="T375"> </text:span><text:span text:style-name="T373">present </text:span><text:span text:style-name="T376">tense </text:span><text:span text:style-name="T375">and future </text:span><text:span text:style-name="T373">tense </text:span>at the same time? <text:span text:style-name="T377">That’s not an accident </text:span><text:span text:style-name="T378">of transcription </text:span><text:span text:style-name="T379">or an error in gramm</text:span><text:span text:style-name="T380">ar</text:span><text:span text:style-name="T377">. Jesus knew exactly what He was saying and why.</text:span></text:p>
          <text:list>
            <text:list-item>
              <text:p text:style-name="P156">The dead (in their sins) were hearing the voice of the Son of God as He spoke these words and many more <text:span text:style-name="T370">in the present tense</text:span>.</text:p>
            </text:list-item>
            <text:list-item>
              <text:p text:style-name="P157">And, in the future the dead in hell would also hear the voice of the Son of God.</text:p>
            </text:list-item>
          </text:list>
        </text:list-item>
      </text:list>
      <text:p text:style-name="P51"/>
      <text:p text:style-name="P51"/>
      <text:p text:style-name="P158">Both the living and the <text:span text:style-name="T381">dead hear</text:span> the voice of <text:span text:style-name="T382">the Saviour</text:span></text:p>
      <text:p text:style-name="P159"/>
      <table:table table:name="Table35" table:style-name="Table35">
        <table:table-column table:style-name="Table35.A"/>
        <table:table-row>
          <table:table-cell table:style-name="Table35.A1" office:value-type="string">
            <text:p text:style-name="P160">1 Peter 3:18-20</text:p>
            <text:p text:style-name="P161"><text:span text:style-name="T32">18</text:span> For Christ also hath once suffered for sins, the just for the unjust, that <text:span text:style-name="T33">he might bring us to God</text:span>, <text:span text:style-name="T286">being put to death in the flesh</text:span>, but quickened by the Spirit:</text:p>
            <text:p text:style-name="P161"><text:span text:style-name="T32">19</text:span> <text:span text:style-name="T286">By which</text:span> also <text:span text:style-name="T128">he went</text:span> and <text:span text:style-name="T127">preached unto the spirits in prison</text:span>;</text:p>
            <text:p text:style-name="P161"><text:span text:style-name="T32">20</text:span> Which sometime were disobedient, when once the longsuffering of God waited in the days of Noah, while the ark was a preparing, wherein few, that is, eight souls were saved by water.</text:p>
          </table:table-cell>
        </table:table-row>
      </table:table>
      <text:list text:style-name="L21">
        <text:list-item>
          <text:p text:style-name="P162"><text:span text:style-name="T383">I</text:span><text:span text:style-name="T91">f the dead were already with God why would they need to be brought to God?</text:span></text:p>
        </text:list-item>
        <text:list-item>
          <text:p text:style-name="P163"><text:span text:style-name="T384">Notice that w</text:span><text:span text:style-name="T385">e are not told that Jesus only preached to one side or the other </text:span><text:span text:style-name="T386">of hell</text:span><text:span text:style-name="T385">, or to the upper or lowest part of hell. </text:span><text:span text:style-name="T387">I</text:span><text:span text:style-name="T385">t appears that from what we are told that Jesus preached to everyone in hell.</text:span></text:p>
        </text:list-item>
      </text:list>
      <text:p text:style-name="P164"><text:soft-page-break/>Truth from every angle</text:p>
      <text:p text:style-name="P165"/>
      <table:table table:name="Table31" table:style-name="Table31">
        <table:table-column table:style-name="Table31.A"/>
        <table:table-row>
          <table:table-cell table:style-name="Table31.A1" office:value-type="string">
            <text:p text:style-name="P166">Psalms 16:10</text:p>
            <text:p text:style-name="P167">For <text:span text:style-name="T33">thou wilt not leave my soul in hell</text:span>; neither wilt thou suffer thine Holy One to see corruption.</text:p>
          </table:table-cell>
        </table:table-row>
        <table:table-row>
          <table:table-cell table:style-name="Table31.A2" office:value-type="string">
            <text:p text:style-name="P168"><text:span text:style-name="T15">Acts 2:25-27,</text:span><text:span text:style-name="T388">31</text:span><text:span text:style-name="T43"><text:line-break/></text:span><text:span text:style-name="T389">25</text:span><text:span text:style-name="T43"> For </text:span><text:span text:style-name="T45">David speaketh concerning him</text:span><text:span text:style-name="T43">, I foresaw the Lord always before my face, for he is on my right hand, that I should not be moved: <text:line-break/></text:span><text:span text:style-name="T389">26</text:span><text:span text:style-name="T43"> Therefore did my heart rejoice, and my tongue was glad; moreover also my flesh shall rest in hope: <text:line-break/></text:span><text:span text:style-name="T389">27</text:span><text:span text:style-name="T43"> Because </text:span><text:span text:style-name="T45">thou wilt not leave my soul in hell</text:span><text:span text:style-name="T43">, neither wilt thou suffer thine Holy One to see corruption.</text:span></text:p>
            <text:p text:style-name="P168"><text:span text:style-name="T389">31</text:span> <text:span text:style-name="T43">He</text:span><text:span text:style-name="T390"> </text:span><text:span text:style-name="T43">seeing this before spake of the resurrection </text:span><text:span text:style-name="T45">of Christ</text:span><text:span text:style-name="T43">, that </text:span><text:span text:style-name="T45">his soul was not left in hell</text:span><text:span text:style-name="T43">, neither his flesh did see corruption.</text:span></text:p>
          </table:table-cell>
        </table:table-row>
      </table:table>
      <text:list text:style-name="L22">
        <text:list-item>
          <text:p text:style-name="P169"><text:span text:style-name="T391">Peter’s first sermon </text:span><text:span text:style-name="T392">in </text:span><text:span text:style-name="T15">Acts 2</text:span><text:span text:style-name="T392"> </text:span><text:span text:style-name="T393">reveals to us who</text:span><text:span text:style-name="T391"> David was writing about in </text:span><text:span text:style-name="T15">Psalm 16:10</text:span><text:span text:style-name="T394">.</text:span></text:p>
          <text:list>
            <text:list-item>
              <text:p text:style-name="P169"><text:span text:style-name="T395">Not coincidentally, w</text:span><text:span text:style-name="T396">hat David said </text:span><text:span text:style-name="T397">as he was moved by the Holy Ghost </text:span><text:span text:style-name="T396">was also truth concerning his own soul which would wait in </text:span><text:span text:style-name="T398">the comfort side of </text:span><text:span text:style-name="T396">hell for </text:span><text:span text:style-name="T399">over 1,000</text:span><text:span text:style-name="T396"> years</text:span><text:span text:style-name="T400">.</text:span></text:p>
            </text:list-item>
          </text:list>
        </text:list-item>
        <text:list-item>
          <text:p text:style-name="P170"><text:span text:style-name="T401">I</text:span><text:span text:style-name="T402">n order for Jesus’ soul to not be left in hell: it would first have to go there.</text:span></text:p>
        </text:list-item>
      </text:list>
      <text:p text:style-name="P51"/>
      <text:p text:style-name="P51"/>
      <text:p text:style-name="P171">Samuel is brought “up” <text:span text:style-name="T403">after his death</text:span></text:p>
      <text:p text:style-name="Standard"/>
      <table:table table:name="Table21" table:style-name="Table21">
        <table:table-column table:style-name="Table21.A"/>
        <table:table-row>
          <table:table-cell table:style-name="Table21.A1" office:value-type="string">
            <text:p text:style-name="P172">1 Samuel 28:11-15</text:p>
            <text:p text:style-name="P173"><text:span text:style-name="T32">11</text:span> Then said the woman, <text:span text:style-name="T404">Whom shall I </text:span><text:span text:style-name="T405">bring up</text:span><text:span text:style-name="T404"> unto thee?</text:span> And he said, <text:span text:style-name="T406">Bring me up Samuel</text:span>.</text:p>
            <text:p text:style-name="P173"><text:span text:style-name="T32">12</text:span> And when the woman saw Samuel, she cried with a loud voice: and the woman spake to Saul, saying, <text:span text:style-name="T404">Why hast thou deceived me? for thou art Saul.</text:span></text:p>
            <text:p text:style-name="P173"><text:span text:style-name="T32">13</text:span> And the king said unto her, <text:span text:style-name="T407">Be not afraid: for what sawest thou?</text:span> And the woman said unto Saul, <text:span text:style-name="T404">I saw </text:span><text:span text:style-name="T405">gods ascending out of the earth</text:span><text:span text:style-name="T404">.</text:span></text:p>
            <text:p text:style-name="P173"><text:span text:style-name="T32">14</text:span> And he said unto her, <text:span text:style-name="T407">What form is he of?</text:span> And she said, <text:span text:style-name="T404">An old man </text:span><text:span text:style-name="T405">cometh up</text:span><text:span text:style-name="T404">; and he is covered with a mantle.</text:span> And Saul perceived that it was Samuel, and he stooped with his face to the ground, and bowed himself.</text:p>
            <text:p text:style-name="P173"><text:span text:style-name="T32">15</text:span> And Samuel said to Saul, <text:span text:style-name="T408">Why hast thou disquieted me, to bring me up?</text:span> And Saul answered, <text:span text:style-name="T409">I am sore distressed; for the Philistines make war against me, and God is departed from me, and answereth me no more, neither by prophets, nor by dreams: therefore I have called thee, that thou mayest make known unto me what I shall do.</text:span></text:p>
          </table:table-cell>
        </table:table-row>
        <table:table-row>
          <table:table-cell table:style-name="Table21.A2" office:value-type="string">
            <text:p text:style-name="P174">1 Samuel 28:19</text:p>
            <text:p text:style-name="P175"><text:span text:style-name="T43">Moreover the LORD will also deliver Israel with thee into the hand of the Philistines: and to morrow shalt </text:span><text:span text:style-name="T45">thou and thy sons be</text:span> <text:span text:style-name="T410">with me</text:span><text:span text:style-name="T43">: the LORD also shall deliver the host of Israel into the hand of the Philistines.</text:span></text:p>
          </table:table-cell>
        </table:table-row>
      </table:table>
      <text:list text:style-name="L23">
        <text:list-item>
          <text:p text:style-name="P176"><text:span text:style-name="T411">T</text:span><text:span text:style-name="T412">he witch of Endor brought </text:span><text:span text:style-name="T413">Samuel </text:span><text:span text:style-name="T412">“up” from </text:span><text:span text:style-name="T414">the nether parts of the earth</text:span><text:span text:style-name="T415"> </text:span><text:span text:style-name="T416">and not “down” from heaven.</text:span></text:p>
        </text:list-item>
        <text:list-item>
          <text:p text:style-name="P177"><text:span text:style-name="T415">T</text:span><text:span text:style-name="T412">he spirits that the woman saw were “ascending out of the earth”.</text:span></text:p>
        </text:list-item>
        <text:list-item>
          <text:p text:style-name="P178"><text:span text:style-name="T417">W</text:span><text:span text:style-name="T402">hether you believe Saul and his sons were saved or not, Samuel says “thou and thy sons [will] be with me </text:span><text:span text:style-name="T418">[tomorrow]</text:span><text:span text:style-name="T402">”.</text:span></text:p>
          <text:list>
            <text:list-item>
              <text:p text:style-name="P178"><text:span text:style-name="T419">H</text:span><text:span text:style-name="T420">e </text:span><text:span text:style-name="T419">was not only saying </text:span><text:span text:style-name="T421">that </text:span><text:span text:style-name="T419">they were going to die but also that they would be in the same place </text:span><text:span text:style-name="T422">as Samuel.</text:span></text:p>
            </text:list-item>
          </text:list>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179"><text:soft-page-break/><text:span text:style-name="T423">T</text:span><text:span text:style-name="T424">his Psalm takes on a whole new meaning</text:span></text:p>
      <text:p text:style-name="P51"/>
      <table:table table:name="Table37" table:style-name="Table37">
        <table:table-column table:style-name="Table37.A"/>
        <table:table-row>
          <table:table-cell table:style-name="Table37.A1" office:value-type="string">
            <text:p text:style-name="P180">Psalms 18:0,4-24</text:p>
            <text:p text:style-name="P181"><text:span text:style-name="T425">¶ (To the chief Musician, </text:span><text:span text:style-name="T426">A Psalm of David</text:span><text:span text:style-name="T425">, the servant of the LORD, who spake unto the LORD the words of this song </text:span><text:span text:style-name="T427">in the day that the LORD delivered him from the hand of all his enemies</text:span><text:span text:style-name="T425">, and from the hand of Saul): </text:span><text:span text:style-name="T428">And he said,</text:span></text:p>
            <text:p text:style-name="P181"><text:span text:style-name="T428">...</text:span><text:line-break/><text:span text:style-name="T429">4</text:span> The sorrows of death compassed me, and the floods of ungodly men made me afraid.</text:p>
            <text:p text:style-name="P182"><text:span text:style-name="T429">5</text:span> <text:span text:style-name="T33">The sorrows of hell compassed me about</text:span>: the snares of death prevented me.</text:p>
            <text:p text:style-name="P182"><text:span text:style-name="T429">6</text:span> In my distress I called upon the LORD, and cried unto my God: he heard my voice out of his temple, and my cry came before him, <text:span text:style-name="T129">even</text:span> into his ears.</text:p>
            <text:p text:style-name="P182"><text:span text:style-name="T429">7</text:span> Then <text:span text:style-name="T33">the earth shook and trembled</text:span>; the foundations also of the hills moved and were shaken, because he was wroth.</text:p>
            <text:p text:style-name="P182"><text:span text:style-name="T429">8</text:span> There went up a smoke out of his nostrils, and fire out of his mouth devoured: coals were kindled by it.</text:p>
            <text:p text:style-name="P182"><text:span text:style-name="T429">9</text:span> He bowed the heavens also, and came down: and darkness <text:span text:style-name="T129">was</text:span> under his feet.</text:p>
            <text:p text:style-name="P182"><text:span text:style-name="T429">10</text:span> And he rode upon a cherub, and did fly: yea, he did fly upon the wings of the wind.</text:p>
            <text:p text:style-name="P182"><text:span text:style-name="T429">11</text:span> He made darkness his secret place; his pavilion round about him <text:span text:style-name="T129">were</text:span> dark waters <text:span text:style-name="T129">and</text:span> thick clouds of the skies.</text:p>
            <text:p text:style-name="P182"><text:span text:style-name="T429">12</text:span> At the brightness <text:span text:style-name="T129">that was</text:span> before him his thick clouds passed, hail <text:span text:style-name="T129">stones</text:span> and coals of fire.</text:p>
            <text:p text:style-name="P182"><text:span text:style-name="T429">13</text:span> The LORD also thundered in the heavens, and the Highest gave his voice; hail <text:span text:style-name="T129">stones</text:span> and coals of fire.</text:p>
            <text:p text:style-name="P182"><text:span text:style-name="T429">14</text:span> Yea, he sent out his arrows, and scattered them; and he shot out lightnings, and discomfited them.</text:p>
            <text:p text:style-name="P182"><text:span text:style-name="T429">15</text:span> Then the channels of waters were seen, and the foundations of the world were discovered at thy rebuke, O LORD, at the blast of the breath of thy nostrils.</text:p>
            <text:p text:style-name="P182"><text:span text:style-name="T429">16</text:span> He sent from above, <text:span text:style-name="T33">he took me</text:span>, he drew me out of many waters.</text:p>
            <text:p text:style-name="P182"><text:span text:style-name="T429">17</text:span> He delivered me from my strong enemy, and from them which hated me: for they were too strong for me.</text:p>
            <text:p text:style-name="P182"><text:span text:style-name="T429">18</text:span> They prevented me in the day of my calamity: but the LORD was my stay.</text:p>
            <text:p text:style-name="P182"><text:span text:style-name="T429">19</text:span> <text:span text:style-name="T33">He brought me forth also into a large place</text:span>; he delivered <text:span text:style-name="T33">me, because he delighted in me</text:span><text:span text:style-name="T430">H2654 </text:span><text:span text:style-name="T431">(</text:span><text:span text:style-name="T432">Mat 3:17, 17:5</text:span><text:span text:style-name="T32">,</text:span> <text:span text:style-name="T432">Mar 1:11</text:span><text:span text:style-name="T32">,</text:span> <text:span text:style-name="T432">2Pe 1:17</text:span><text:span text:style-name="T431">)</text:span>.</text:p>
            <text:p text:style-name="P182"><text:span text:style-name="T429">20</text:span> The LORD rewarded me according to <text:span text:style-name="T33">my righteousness</text:span>; according to the <text:span text:style-name="T33">cleanness of my hands</text:span> hath he recompensed me.</text:p>
            <text:p text:style-name="P182"><text:span text:style-name="T429">21</text:span> For <text:span text:style-name="T33">I have kept the ways of the LORD</text:span>, and <text:span text:style-name="T33">have not wickedly departed from my God</text:span>.</text:p>
            <text:p text:style-name="P182"><text:span text:style-name="T429">22</text:span> For all his judgments <text:span text:style-name="T129">were</text:span> before me, and <text:span text:style-name="T33">I did not put away his statutes from me</text:span>.</text:p>
            <text:p text:style-name="P182"><text:span text:style-name="T429">23</text:span> <text:span text:style-name="T33">I was also upright before him</text:span>, and <text:span text:style-name="T33">I kept myself from mine iniquity</text:span>.</text:p>
            <text:p text:style-name="P182"><text:span text:style-name="T429">24</text:span> Therefore hath the LORD recompensed me according to <text:span text:style-name="T33">my righteousness</text:span>, according to the <text:span text:style-name="T33">cleanness of my hands</text:span> in his eyesight.</text:p>
          </table:table-cell>
        </table:table-row>
      </table:table>
      <text:list text:style-name="L24">
        <text:list-item>
          <text:p text:style-name="P183"><text:span text:style-name="T433">N</text:span><text:span text:style-name="T70">owhere is it recorded that David was delivered from death by God during which an earthquake occurred.</text:span></text:p>
          <text:list>
            <text:list-item>
              <text:p text:style-name="P184"><text:span text:style-name="T434">T</text:span><text:span text:style-name="T435">here was an earthquake after Jesus gave up the ghost </text:span><text:span text:style-name="T436">(</text:span><text:span text:style-name="T15">Matthew 27:51</text:span><text:span text:style-name="T436">).</text:span></text:p>
            </text:list-item>
          </text:list>
        </text:list-item>
        <text:list-item>
          <text:p text:style-name="P185"><text:span text:style-name="T437">v</text:span><text:span text:style-name="T15">19</text:span><text:span text:style-name="T437"> - </text:span><text:span text:style-name="T438">In five different verses God the Father said He was “well pleased” (delighted) in His Son: </text:span><text:span text:style-name="T15">Matthew 3:17</text:span><text:span text:style-name="T39">, </text:span><text:span text:style-name="T15">17:5</text:span><text:span text:style-name="T438">, </text:span><text:span text:style-name="T15">Mark 1:11</text:span><text:span text:style-name="T438">, </text:span><text:span text:style-name="T15">Luke 3:22</text:span><text:span text:style-name="T438">, </text:span><text:span text:style-name="T15">2 Peter 1:17</text:span><text:span text:style-name="T438">.</text:span></text:p>
        </text:list-item>
        <text:list-item>
          <text:p text:style-name="P186"><text:span text:style-name="T439">Verses </text:span><text:span text:style-name="T15">20,24</text:span><text:span text:style-name="T439"> with </text:span><text:span text:style-name="T15">Isaiah 64:6</text:span><text:span text:style-name="T439"> </text:span><text:span text:style-name="T440">and </text:span><text:span text:style-name="T15">Romans 3:23</text:span><text:span text:style-name="T439">, we can only conclude that </text:span><text:span text:style-name="T441">most if not all of </text:span><text:span text:style-name="T442">these events are not about David but </text:span><text:span text:style-name="T441">are</text:span><text:span text:style-name="T442"> instead prophecy about Jesus</text:span><text:span text:style-name="T439">.</text:span></text:p>
          <text:list>
            <text:list-item>
              <text:p text:style-name="P187"><text:span text:style-name="T443">David very clearly departed from God when he committed adultery with Bathsheba and in his pride </text:span><text:span text:style-name="T444">when </text:span><text:span text:style-name="T443">he numbered the people </text:span><text:span text:style-name="T444">and surely like all humans, </text:span><text:span text:style-name="T445">reborn or not, </text:span><text:span text:style-name="T444">he sinned on a regular basis.</text:span></text:p>
              <text:list>
                <text:list-item>
                  <text:p text:style-name="P187"><text:span text:style-name="T15">Pro</text:span><text:span text:style-name="T446">verbs</text:span><text:span text:style-name="T15"> </text:span><text:span text:style-name="T446">4:16, </text:span><text:span text:style-name="T15">26:11</text:span><text:span text:style-name="T447">, </text:span><text:span text:style-name="T15">Psalms 51:3</text:span><text:span text:style-name="T448">, </text:span><text:span text:style-name="T15">1 John 1:8</text:span></text:p>
                </text:list-item>
              </text:list>
            </text:list-item>
          </text:list>
        </text:list-item>
        <text:list-item>
          <text:p text:style-name="P188">And so what we <text:span text:style-name="T449">really </text:span>have here is <text:span text:style-name="T450">a</text:span><text:span text:style-name="T451"> </text:span><text:span text:style-name="T452">very </text:span><text:span text:style-name="T451">detailed</text:span> description of God the Father saving God the Son <text:span text:style-name="T453">that begins </text:span>after <text:span text:style-name="T454">Jesus’</text:span> death <text:span text:style-name="T454">on the cross...</text:span><text:span text:style-name="T455">in the day that the LORD delivered Him from the hand of all His enemies.</text:span></text:p>
        </text:list-item>
      </text:list>
      <text:p text:style-name="P189">A <text:span text:style-name="T456">pivotal</text:span> definition</text:p>
      <text:p text:style-name="P51"/>
      <text:p text:style-name="P190"><text:span text:style-name="T457">Some have written </text:span><text:span text:style-name="T458">or surmised </text:span><text:span text:style-name="T459">(myself included) </text:span><text:span text:style-name="T457">that paradise is the comfort side of hell but </text:span><text:span text:style-name="T460">I believe that </text:span><text:span text:style-name="T457">the Bible teaches us </text:span><text:span text:style-name="T461">otherwise</text:span><text:span text:style-name="T457">. </text:span><text:span text:style-name="T462">The word </text:span><text:span text:style-name="T463">“</text:span><text:span text:style-name="T464">p</text:span><text:span text:style-name="T465">aradise” appears </text:span><text:span text:style-name="T466">three</text:span><text:span text:style-name="T465"> times (</text:span><text:span text:style-name="T15">Luke 23:43</text:span><text:span text:style-name="T465">, </text:span><text:span text:style-name="T15">2 Corinthians 12:4</text:span><text:span text:style-name="T465">, </text:span><text:span text:style-name="T15">Revelation 2:7</text:span><text:span text:style-name="T465">).</text:span></text:p>
      <text:p text:style-name="P191"/>
      <table:table table:name="Table6" table:style-name="Table6">
        <table:table-column table:style-name="Table6.A"/>
        <table:table-row>
          <table:table-cell table:style-name="Table6.A1" office:value-type="string">
            <text:p text:style-name="P192"><text:span text:style-name="T15">Luke 23:43</text:span><text:span text:style-name="T91"><text:line-break/>And Jesus said unto him, </text:span><text:span text:style-name="T467">Verily I say unto thee, To day</text:span><text:span text:style-name="T468">G4594</text:span><text:span text:style-name="T467"> shalt thou be with me in </text:span><text:span text:style-name="T469">paradise</text:span><text:span text:style-name="T470">G3857</text:span><text:span text:style-name="T91">.</text:span></text:p>
          </table:table-cell>
        </table:table-row>
      </table:table>
      <text:list text:style-name="L25">
        <text:list-item>
          <text:p text:style-name="P193">To the penitent thief on the cross beside Jesus it was promised that <text:span text:style-name="T471">that day</text:span> he would be in “paradise” with Jesus.</text:p>
          <text:list>
            <text:list-item>
              <text:p text:style-name="P194"><text:span text:style-name="T472">When He said “to day” He very specifically meant “this day” </text:span><text:span text:style-name="T473">(</text:span><text:span text:style-name="T474">the </text:span><text:span text:style-name="T475">evening and the morning</text:span><text:span text:style-name="T473">): </text:span><text:span text:style-name="T472">not a day </text:span><text:span text:style-name="T476">as </text:span><text:span text:style-name="T477">in the </text:span><text:span text:style-name="T478">unspecified </text:span><text:span text:style-name="T477">sense such </text:span><text:span text:style-name="T472">as in </text:span><text:span text:style-name="T15">Joel 2:31</text:span><text:span text:style-name="T479">, the continual </text:span><text:span text:style-name="T480">(daily) </text:span><text:span text:style-name="T479">sense such as in </text:span><text:span text:style-name="T15">Exodus 13:21</text:span><text:span text:style-name="T479">, the </text:span><text:span text:style-name="T478">monthly (new moon) sense as in </text:span><text:span text:style-name="T15">Genesis 8:5</text:span><text:span text:style-name="T478">, </text:span><text:span text:style-name="T476">or </text:span><text:span text:style-name="T481">the dawn (first light in the morning) as in </text:span><text:span text:style-name="T15">Genesis 32:24</text:span><text:span text:style-name="T476">.</text:span></text:p>
            </text:list-item>
          </text:list>
        </text:list-item>
        <text:list-item>
          <text:p text:style-name="P195"><text:span text:style-name="T482">Since Jesus descended into </text:span><text:span text:style-name="T483">the lower parts of the earth </text:span><text:span text:style-name="T482">where all the dead </text:span><text:span text:style-name="T483">previously went, it makes sense that some might equate the comfort side of hell to paradise </text:span><text:span text:style-name="T484">if</text:span><text:span text:style-name="T485"> you isolate this verse</text:span><text:span text:style-name="T486"> </text:span><text:span text:style-name="T485">by itself. </text:span><text:span text:style-name="T487">However, if you think about </text:span><text:span text:style-name="T488">the implications of that it</text:span><text:span text:style-name="T487"> really makes no sense. </text:span><text:span text:style-name="T489">For example: T</text:span><text:span text:style-name="T490">hose that were in the comfort side of hell were </text:span><text:span text:style-name="T491">brought to</text:span><text:span text:style-name="T490"> God. </text:span><text:span text:style-name="T487">A ransom was paid </text:span><text:span text:style-name="T492">and</text:span><text:span text:style-name="T487"> they were </text:span><text:span text:style-name="T493">bought </text:span><text:span text:style-name="T494">back</text:span><text:span text:style-name="T487">. </text:span><text:span text:style-name="T489">I</text:span><text:span text:style-name="T490">f the comfort side of hell was equivalent to paradise </text:span><text:span text:style-name="T487">then God would have already been there </text:span><text:span text:style-name="T495">and there would be no need to </text:span><text:span text:style-name="T496">bring them</text:span><text:span text:style-name="T495"> to God </text:span><text:span text:style-name="T489">(or for God to go to them)</text:span><text:span text:style-name="T495">. </text:span><text:span text:style-name="T497">Therefore, the hypothesis that paradise = the comfort side of hell is self-defeating.</text:span></text:p>
        </text:list-item>
      </text:list>
      <text:p text:style-name="P196"/>
      <text:p text:style-name="P196"/>
      <table:table table:name="Table7" table:style-name="Table7">
        <table:table-column table:style-name="Table7.A"/>
        <table:table-row>
          <table:table-cell table:style-name="Table7.A1" office:value-type="string">
            <text:p text:style-name="P192"><text:span text:style-name="T15">2 Corinthians 12:1-4</text:span><text:span text:style-name="T91"><text:line-break/></text:span><text:span text:style-name="T498">1</text:span><text:span text:style-name="T91"> It is not expedient for me doubtless to glory. I will come to </text:span><text:span text:style-name="T92">visions and revelations of the Lord</text:span><text:span text:style-name="T91">. <text:line-break/></text:span><text:span text:style-name="T498">2</text:span><text:span text:style-name="T91"> I knew a man in Christ above fourteen years ago, (whether in the body, I cannot tell; or whether out of the body, I cannot tell: God knoweth;) such an one </text:span><text:span text:style-name="T499">caught up to the third heaven</text:span><text:span text:style-name="T91">. <text:line-break/></text:span><text:span text:style-name="T498">3</text:span><text:span text:style-name="T91"> And I knew such a man, (whether in the body, or out of the body, I cannot tell: God knoweth;) <text:line-break/></text:span><text:span text:style-name="T498">4</text:span><text:span text:style-name="T91"> How that he was </text:span><text:span text:style-name="T499">caught up into paradise</text:span><text:span text:style-name="T500">G3857</text:span><text:span text:style-name="T91">, and heard unspeakable words, which it is not lawful for a man to utter.<text:line-break/></text:span><text:span text:style-name="T501">5</text:span><text:span text:style-name="T91"> </text:span><text:span text:style-name="T92">Of such an one will I glory</text:span><text:span text:style-name="T91">: yet of myself I will not glory, but in mine infirmities.</text:span></text:p>
          </table:table-cell>
        </table:table-row>
      </table:table>
      <text:list text:style-name="L26">
        <text:list-item>
          <text:p text:style-name="P197"><text:span text:style-name="T502">The same place is referred to by two different names: </text:span>“paradise” <text:span text:style-name="T502">and “</text:span>the third heaven”.</text:p>
        </text:list-item>
        <text:list-item>
          <text:p text:style-name="P197"><text:span text:style-name="T503">If paradise was the comfort side of hell we would expect to see hell</text:span><text:span text:style-name="T504">G86</text:span><text:span text:style-name="T503"> </text:span><text:span text:style-name="T505">(or an equivalent word or phrase)</text:span><text:span text:style-name="T503"> here instead of “the third heaven”. </text:span><text:span text:style-name="T506">I</text:span><text:span text:style-name="T507">nstead, </text:span><text:span text:style-name="T508">we see a phrase that is not only new but also entirely unique </text:span><text:span text:style-name="T509">(which also means that the</text:span><text:span text:style-name="T510">re is one</text:span><text:span text:style-name="T509"> definition </text:span><text:span text:style-name="T510">for </text:span><text:span text:style-name="T509">“</text:span><text:span text:style-name="T510">the </text:span><text:span text:style-name="T509">third heaven” </text:span><text:span text:style-name="T510">and that </text:span><text:span text:style-name="T509">is “paradise”)</text:span><text:span text:style-name="T508">.</text:span></text:p>
        </text:list-item>
        <text:list-item>
          <text:p text:style-name="P198"><text:span text:style-name="T511">We are only to glory in the Lord (</text:span><text:span text:style-name="T15">Jeremiah 9:23,24</text:span><text:span text:style-name="T511">, </text:span><text:span text:style-name="T15">1 Corinthians 1:31, 3:21</text:span><text:span text:style-name="T512">, </text:span><text:span text:style-name="T15">2 Corinthians 10:17</text:span><text:span text:style-name="T511">) so </text:span><text:span text:style-name="T513">then </text:span><text:span text:style-name="T511">v</text:span><text:span text:style-name="T15">5a</text:span><text:span text:style-name="T511"> </text:span><text:span text:style-name="T514">refers to the Lord. </text:span><text:span text:style-name="T515">Wherever this third heaven/paradise is, the Lord is also there.</text:span></text:p>
        </text:list-item>
      </text:list>
      <text:p text:style-name="P199"/>
      <text:p text:style-name="P199"/>
      <table:table table:name="Table8" table:style-name="Table8">
        <table:table-column table:style-name="Table8.A"/>
        <table:table-row>
          <table:table-cell table:style-name="Table8.A1" office:value-type="string">
            <text:p text:style-name="P200"><text:span text:style-name="T15">Revelation 2:7</text:span><text:span text:style-name="T91"><text:line-break/></text:span><text:span text:style-name="T467">He that hath an ear, let him hear what the Spirit saith unto the churches; To him that overcometh</text:span><text:span text:style-name="T91"> </text:span><text:span text:style-name="T467">will </text:span><text:span text:style-name="T469">I give</text:span><text:span text:style-name="T467"> to eat of the </text:span><text:span text:style-name="T469">tree of life</text:span><text:span text:style-name="T467">, which is in the midst of the </text:span><text:span text:style-name="T469">paradise</text:span><text:span text:style-name="T500">G3857</text:span><text:span text:style-name="T91"> </text:span><text:span text:style-name="T469">of God</text:span><text:span text:style-name="T91">.</text:span></text:p>
            <text:p text:style-name="P200"><text:span text:style-name="T91"><text:line-break/></text:span><text:span text:style-name="T15">Revelation 22:1-2</text:span><text:span text:style-name="T91"><text:line-break/></text:span><text:span text:style-name="T498">1</text:span><text:span text:style-name="T91"> And he shewed me a pure river of water of life, clear as crystal, proceeding out of </text:span><text:span text:style-name="T115">the </text:span><text:span text:style-name="T92">throne of God and of the Lamb</text:span><text:span text:style-name="T91">. <text:line-break/></text:span><text:span text:style-name="T498">2</text:span><text:span text:style-name="T91"> In the midst of the street of it, and on either side of the river, </text:span><text:span text:style-name="T516">was there</text:span><text:span text:style-name="T91"> the </text:span><text:span text:style-name="T92">tree of life</text:span><text:span text:style-name="T91">, which bare twelve </text:span><text:span text:style-name="T516">manner of</text:span><text:span text:style-name="T91"> fruits, </text:span><text:span text:style-name="T516">and</text:span><text:span text:style-name="T91"> yielded her fruit every month: and the leaves of the tree </text:span><text:span text:style-name="T516">were</text:span><text:span text:style-name="T91"> for the healing of the nations.</text:span></text:p>
          </table:table-cell>
        </table:table-row>
      </table:table>
      <text:list text:style-name="L27">
        <text:list-item>
          <text:p text:style-name="P201"><text:span text:style-name="T517">T</text:span><text:span text:style-name="T518">he tree of life is in the middle of the garden </text:span><text:span text:style-name="T517">planted by the LORD</text:span><text:span text:style-name="T518"> God</text:span><text:span text:style-name="T519"> in </text:span><text:span text:style-name="T15">Genesis 2:8,9</text:span><text:span text:style-name="T518">. </text:span><text:span text:style-name="T520">It is </text:span><text:span text:style-name="T521">in the middle of the </text:span><text:span text:style-name="T522">paradise of God </text:span><text:span text:style-name="T519">in </text:span><text:span text:style-name="T15">Revelation 2:7</text:span><text:span text:style-name="T519">. </text:span><text:span text:style-name="T523">After the new heaven and </text:span><text:span text:style-name="T524">new </text:span><text:span text:style-name="T523">earth is created (</text:span><text:span text:style-name="T15">Revelation 21</text:span><text:span text:style-name="T523">) the tree of life </text:span><text:span text:style-name="T521">is </text:span><text:span text:style-name="T525">in</text:span><text:span text:style-name="T521"> the middle </text:span><text:span text:style-name="T526">of </text:span><text:span text:style-name="T521">and on both sides of the </text:span><text:span text:style-name="T526">pure </text:span><text:span text:style-name="T521">river </text:span><text:span text:style-name="T526">of water of life</text:span><text:span text:style-name="T527">. </text:span><text:span text:style-name="T528">None of these </text:span><text:span text:style-name="T529">appear to be </text:span><text:span text:style-name="T528">anywhere near</text:span><text:span text:style-name="T530"> </text:span><text:span text:style-name="T531">the comfort side of hell</text:span><text:span text:style-name="T530">.</text:span></text:p>
        </text:list-item>
      </text:list>
      <text:p text:style-name="P202"><text:soft-page-break/>Another <text:span text:style-name="T532">Biblical perspective of</text:span> the “third heaven”</text:p>
      <text:p text:style-name="Standard"/>
      <table:table table:name="Table9" table:style-name="Table9">
        <table:table-column table:style-name="Table9.A"/>
        <table:table-row>
          <table:table-cell table:style-name="Table9.A1" office:value-type="string">
            <text:p text:style-name="P203"><text:span text:style-name="T15">Genesis 1:1</text:span><text:span text:style-name="T533"><text:line-break/></text:span><text:span text:style-name="T201">In the beginning God created the </text:span><text:span text:style-name="T534">heaven</text:span><text:span text:style-name="T535">H8064</text:span><text:span text:style-name="T201"> and the earth.</text:span><text:span text:style-name="T533"><text:line-break/></text:span></text:p>
            <text:p text:style-name="P203"><text:span text:style-name="T15">Deuteronomy 10:14</text:span><text:span text:style-name="T91"><text:line-break/>Behold, the heaven</text:span><text:span text:style-name="T536">H8064</text:span><text:span text:style-name="T91"> and the </text:span><text:span text:style-name="T92">heaven</text:span><text:span text:style-name="T536">H8064</text:span><text:span text:style-name="T91"> of </text:span><text:span text:style-name="T92">heaven</text:span><text:span text:style-name="T242">s</text:span><text:span text:style-name="T536">H8064</text:span><text:span text:style-name="T91"> </text:span><text:span text:style-name="T516">is</text:span><text:span text:style-name="T91"> the LORD's thy God, the earth </text:span><text:span text:style-name="T516">also</text:span><text:span text:style-name="T91">, with all that therein </text:span><text:span text:style-name="T516">is</text:span><text:span text:style-name="T91">.</text:span></text:p>
            <text:p text:style-name="P203"><text:span text:style-name="T91"><text:line-break/></text:span><text:span text:style-name="T15">1 Kings 8:27</text:span><text:span text:style-name="T91"><text:line-break/>But will God indeed dwell on the earth? behold, the </text:span><text:span text:style-name="T92">heaven</text:span><text:span text:style-name="T536">H8064</text:span><text:span text:style-name="T91"> and </text:span><text:span text:style-name="T92">heaven</text:span><text:span text:style-name="T536">H8064</text:span><text:span text:style-name="T91"> of </text:span><text:span text:style-name="T92">heaven</text:span><text:span text:style-name="T242">s</text:span><text:span text:style-name="T536">H8064</text:span><text:span text:style-name="T91"> cannot contain thee; how much less this house that I have builded?</text:span></text:p>
            <text:p text:style-name="P203"><text:span text:style-name="T91"><text:line-break/></text:span><text:span text:style-name="T15">Psalms 113:4</text:span><text:span text:style-name="T91"><text:line-break/>The LORD </text:span><text:span text:style-name="T516">is</text:span><text:span text:style-name="T91"> high above all nations, </text:span><text:span text:style-name="T516">and</text:span><text:span text:style-name="T91"> his glory </text:span><text:span text:style-name="T92">above the heaven</text:span><text:span text:style-name="T242">s</text:span><text:span text:style-name="T91">.</text:span></text:p>
            <text:p text:style-name="P203"><text:span text:style-name="T91"><text:line-break/></text:span><text:span text:style-name="T15">Ephesians 4:10</text:span><text:span text:style-name="T91"><text:line-break/>He that descended is the same also that ascended up </text:span><text:span text:style-name="T92">far above all heaven</text:span><text:span text:style-name="T242">s</text:span><text:span text:style-name="T91">, that he might fill all things.)</text:span></text:p>
          </table:table-cell>
        </table:table-row>
      </table:table>
      <text:list text:style-name="L28">
        <text:list-item>
          <text:p text:style-name="P204">Heaven = sky.</text:p>
        </text:list-item>
        <text:list-item>
          <text:p text:style-name="P204">Heaven of heavens = sky of skies</text:p>
        </text:list-item>
        <text:list-item>
          <text:p text:style-name="P205">Above the heavens = Far above all heavens = above the heaven and the heaven of heavens.</text:p>
        </text:list-item>
        <text:list-item>
          <text:p text:style-name="P206">So if heaven is the sky and the sky of skies is everything above the sky, what then might the third heaven be? <text:span text:style-name="T537">There’s nothing left except </text:span><text:span text:style-name="T538">th</text:span><text:span text:style-name="T539">e abode of God.</text:span></text:p>
        </text:list-item>
      </text:list>
      <text:p text:style-name="P207"><text:span text:style-name="T540"/></text:p>
      <text:p text:style-name="P207"><text:span text:style-name="T540"/></text:p>
      <text:p text:style-name="P208">Depart ye workers of iniquity</text:p>
      <text:p text:style-name="P51"/>
      <table:table table:name="Table13" table:style-name="Table13">
        <table:table-column table:style-name="Table13.A"/>
        <table:table-row>
          <table:table-cell table:style-name="Table13.A1" office:value-type="string">
            <text:p text:style-name="P209"><text:span text:style-name="T15">John 8:21</text:span><text:span text:style-name="T91"><text:line-break/>Then said Jesus again unto them, </text:span><text:span text:style-name="T467">I go my way, and ye shall seek me, and shall die in your sins: </text:span><text:span text:style-name="T469">whither I go, ye cannot come</text:span><text:span text:style-name="T467">.</text:span></text:p>
          </table:table-cell>
        </table:table-row>
      </table:table>
      <text:list text:style-name="L29">
        <text:list-item>
          <text:p text:style-name="P210"><text:span text:style-name="T541">W</text:span><text:span text:style-name="T97">e know that Jesus wasn’t referring to the grave/</text:span><text:span text:style-name="T542">death/hell</text:span><text:span text:style-name="T97"> here because that’s where all the dead </text:span><text:span text:style-name="T543">went before He unlocked the gates of hell.</text:span></text:p>
        </text:list-item>
        <text:list-item>
          <text:p text:style-name="P211">So, where is the one place that those who die in their sins (reject Jesus) cannot go? <text:span text:style-name="T544">It’s not with God and it’s not on earth – it’s </text:span><text:span text:style-name="T545">in</text:span><text:span text:style-name="T544"> the lowest parts of the earth (the torment side of hell). In other words, they receive what they chose and that is to be separated from God </text:span><text:span text:style-name="T546">which results in </text:span><text:span text:style-name="T547">persistent, </text:span><text:span text:style-name="T548">continual death</text:span><text:span text:style-name="T544">.</text:span></text:p>
        </text:list-item>
        <text:list-item>
          <text:p text:style-name="P212"><text:span text:style-name="T549">That</text:span><text:span text:style-name="T550"> also means that the torment side of hell is not empty </text:span><text:span text:style-name="T551">a</text:span><text:span text:style-name="T552">nd it will continue to fill until the great white throne judgment </text:span><text:span text:style-name="T553">(</text:span><text:span text:style-name="T15">Proverbs 27:20</text:span><text:span text:style-name="T39">, </text:span><text:span text:style-name="T15">30:15,16a</text:span><text:span text:style-name="T553">)</text:span><text:span text:style-name="T552">.</text:span></text:p>
        </text:list-item>
      </text:list>
      <text:p text:style-name="P213"/>
      <text:p text:style-name="P213"/>
      <text:p text:style-name="P214"><text:span text:style-name="T554">I</text:span><text:span text:style-name="T97">nherit the kingdom prepared for you</text:span></text:p>
      <text:p text:style-name="P51"/>
      <table:table table:name="Table24" table:style-name="Table24">
        <table:table-column table:style-name="Table24.A"/>
        <table:table-row>
          <table:table-cell table:style-name="Table24.A1" office:value-type="string">
            <text:p text:style-name="Table_20_Contents"><text:span text:style-name="T15">John 13:36</text:span><text:span text:style-name="T43"><text:line-break/></text:span><text:span text:style-name="T389">36</text:span><text:span text:style-name="T43"> Simon Peter said unto him, Lord, whither goest thou? Jesus answered him, </text:span><text:span text:style-name="T57">Whither I go, thou canst not follow me </text:span><text:span text:style-name="T58">now</text:span><text:span text:style-name="T57">; but </text:span><text:span text:style-name="T58">thou shalt follow me afterwards</text:span><text:span text:style-name="T57">.</text:span></text:p>
          </table:table-cell>
        </table:table-row>
      </table:table>
      <text:list text:style-name="L30">
        <text:list-item>
          <text:p text:style-name="P215">Why couldn’t Peter follow Him? <text:span text:style-name="T555">Because </text:span>Peter wasn’t going to die until <text:span text:style-name="T100">after</text:span><text:span text:style-name="T270"> Jesus.</text:span></text:p>
        </text:list-item>
        <text:list-item>
          <text:p text:style-name="P216">“<text:span text:style-name="T556">afterwards</text:span><text:span text:style-name="T557">” – after what?</text:span></text:p>
        </text:list-item>
        <text:list-item>
          <text:p text:style-name="P217"><text:span text:style-name="T554">T</text:span><text:span text:style-name="T97">hose who do not reject Jesus go to where He </text:span><text:span text:style-name="T94">is</text:span><text:span text:style-name="T97">.</text:span></text:p>
        </text:list-item>
      </text:list>
      <text:p text:style-name="P51"/>
      <text:p text:style-name="P51"/>
      <text:p text:style-name="P218"><text:soft-page-break/><text:span text:style-name="T558">Majesty </text:span><text:span text:style-name="T559">in the heavens</text:span></text:p>
      <text:p text:style-name="P219"/>
      <table:table table:name="Table29" table:style-name="Table29">
        <table:table-column table:style-name="Table29.A"/>
        <table:table-row>
          <table:table-cell table:style-name="Table29.A1" office:value-type="string">
            <text:p text:style-name="P220">John 7:33</text:p>
            <text:p text:style-name="P221">Then said Jesus unto them, <text:span text:style-name="T305">Yet a little while am I with you, and then </text:span><text:span text:style-name="T304">I go unto him that sent me</text:span><text:span text:style-name="T305">.</text:span></text:p>
          </table:table-cell>
        </table:table-row>
        <table:table-row>
          <table:table-cell table:style-name="Table29.A2" office:value-type="string">
            <text:p text:style-name="P220">John 14:12</text:p>
            <text:p text:style-name="P222">Verily, verily, I say unto you, He that believeth on me, the works that I do shall he do also; and greater works than these shall he do; because <text:span text:style-name="T33">I go unto my Father</text:span>.</text:p>
          </table:table-cell>
        </table:table-row>
        <table:table-row>
          <table:table-cell table:style-name="Table29.A2" office:value-type="string">
            <text:p text:style-name="P220">John 14:28</text:p>
            <text:p text:style-name="P222">Ye have heard how I said unto you, I go away, and come again unto you. If ye loved me, ye would rejoice, because I said, <text:span text:style-name="T33">I go unto the Father</text:span>: for my Father is greater than I.</text:p>
          </table:table-cell>
        </table:table-row>
        <table:table-row>
          <table:table-cell table:style-name="Table29.A2" office:value-type="string">
            <text:p text:style-name="P220">John 16:10,<text:span text:style-name="T560">15</text:span></text:p>
            <text:p text:style-name="P222">Of righteousness, because <text:span text:style-name="T33">I go to my Father</text:span>, and ye see me no more;</text:p>
          </table:table-cell>
        </table:table-row>
        <table:table-row>
          <table:table-cell table:style-name="Table29.A2" office:value-type="string">
            <text:p text:style-name="P220">John 16:16</text:p>
            <text:p text:style-name="P223"><text:span text:style-name="T57">A little while, and ye shall not see me: and again, a little while, and ye shall see me, because </text:span><text:span text:style-name="T58">I go to the Father</text:span>.</text:p>
          </table:table-cell>
        </table:table-row>
      </table:table>
      <text:list text:continue-list="list379303797" text:style-name="L9">
        <text:list-item>
          <text:p text:style-name="P224"><text:span text:style-name="T561">V</text:span><text:span text:style-name="T562">erses that state plainly where Jesus went after He ascended to the Father: </text:span><text:span text:style-name="T15">Mark 16:19</text:span><text:span text:style-name="T563">, </text:span><text:span text:style-name="T15">Luke 22:69</text:span><text:span text:style-name="T563">, </text:span><text:span text:style-name="T15">Acts 7:55,56</text:span><text:span text:style-name="T563">, </text:span><text:span text:style-name="T15">Romans 8:34</text:span><text:span text:style-name="T564">, </text:span><text:span text:style-name="T15">Colossians 3:1</text:span><text:span text:style-name="T565">, </text:span><text:span text:style-name="T15">Hebrews 10:12</text:span><text:span text:style-name="T566">, </text:span><text:span text:style-name="T15">12:2</text:span><text:span text:style-name="T567">, </text:span><text:span text:style-name="T15">1 Peter 3:22</text:span><text:span text:style-name="T567">.</text:span></text:p>
        </text:list-item>
      </text:list>
      <text:p text:style-name="P219"/>
      <text:p text:style-name="P219"/>
      <text:p text:style-name="P225"><text:span text:style-name="T568">N</text:span><text:span text:style-name="T558">ot as simple as it </text:span><text:span text:style-name="T569">may appear</text:span></text:p>
      <text:p text:style-name="P219"/>
      <table:table table:name="Table28" table:style-name="Table28">
        <table:table-column table:style-name="Table28.A"/>
        <table:table-row>
          <table:table-cell table:style-name="Table28.A1" office:value-type="string">
            <text:p text:style-name="P220">John 20:17</text:p>
            <text:p text:style-name="P221">Jesus saith unto her, <text:span text:style-name="T341">Touch me not; for </text:span><text:span text:style-name="T304">I am not yet ascended to my Father</text:span><text:span text:style-name="T341">: but go to my brethren, and say unto them, I ascend unto my Father, and your Father; and to my God, and your God.</text:span></text:p>
          </table:table-cell>
        </table:table-row>
      </table:table>
      <text:list xml:id="list123042897923386" text:continue-numbering="true" text:style-name="L9">
        <text:list-item>
          <text:p text:style-name="P226"><text:span text:style-name="T570">A</text:span><text:span text:style-name="T571">fter Jesus’ resurrection </text:span><text:span text:style-name="T570">He tells Mary</text:span><text:span text:style-name="T571"> </text:span><text:span text:style-name="T572">that</text:span><text:span text:style-name="T571"> He had not yet </text:span><text:span text:style-name="T573">ascended</text:span><text:span text:style-name="T571"> to the Father. </text:span><text:span text:style-name="T572">But,</text:span><text:span text:style-name="T570"> </text:span><text:span text:style-name="T572">d</text:span><text:span text:style-name="T570">idn’t we just learn from the definition of “paradise” that </text:span><text:span text:style-name="T572">the penitent thief </text:span><text:span text:style-name="T574">on the cross next to Jesus </text:span><text:span text:style-name="T572">would be in paradise </text:span><text:span text:style-name="T575">with</text:span><text:span text:style-name="T576"> Jesus </text:span><text:span text:style-name="T577">the day</text:span><text:span text:style-name="T572"> that Jesus died on the cross?</text:span></text:p>
        </text:list-item>
        <text:list-item>
          <text:p text:style-name="P226"><text:span text:style-name="T572">There </text:span><text:span text:style-name="T578">are</text:span><text:span text:style-name="T572"> </text:span><text:span text:style-name="T577">at least</text:span><text:span text:style-name="T572"> two explanation</text:span><text:span text:style-name="T579">s</text:span><text:span text:style-name="T572">:</text:span></text:p>
          <text:list>
            <text:list-item>
              <text:p text:style-name="P227"><text:span text:style-name="T572">In </text:span><text:span text:style-name="T15">Luke 23:43</text:span><text:span text:style-name="T572"> when Jesus’ said “me” He meant God the Father </text:span><text:span text:style-name="T580">(</text:span><text:span text:style-name="T581">1 John 5:7</text:span><text:span text:style-name="T580">) </text:span><text:span text:style-name="T582">and God the Son did not ascend to paradise </text:span><text:span text:style-name="T583">until later.</text:span></text:p>
              <text:list>
                <text:list-item>
                  <text:p text:style-name="P228"><text:span text:style-name="T584">In this case, t</text:span>he angels <text:span text:style-name="T584">of God might have </text:span>escorted the dead in Christ to paradise <text:span text:style-name="T584">or they just went themselves since </text:span><text:span text:style-name="T585">Jesus unlocked the </text:span><text:span text:style-name="T584">gates of hell </text:span><text:span text:style-name="T585">and </text:span><text:span text:style-name="T584">they had liberty to do so.</text:span></text:p>
                </text:list-item>
              </text:list>
            </text:list-item>
            <text:list-item>
              <text:p text:style-name="P229"><text:span text:style-name="T586">H</text:span><text:span text:style-name="T572">ere in </text:span><text:span text:style-name="T15">John 20:17</text:span><text:span text:style-name="T572"> Jesus was referring simply to His </text:span><text:span text:style-name="T577">bodily</text:span><text:span text:style-name="T572"> ascension </text:span><text:span text:style-name="T587">(</text:span><text:span text:style-name="T581">Acts 1:9</text:span><text:span text:style-name="T587">)</text:span><text:span text:style-name="T572">.</text:span></text:p>
            </text:list-item>
          </text:list>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30"><text:soft-page-break/><text:span text:style-name="T588">Men &amp; Women in heaven</text:span></text:p>
      <text:p text:style-name="P231"><text:span text:style-name="T589"/></text:p>
      <table:table table:name="Table18" table:style-name="Table18">
        <table:table-column table:style-name="Table18.A"/>
        <table:table-row>
          <table:table-cell table:style-name="Table18.A1" office:value-type="string">
            <text:p text:style-name="P232">Revelation 5:3</text:p>
            <text:p text:style-name="P233"><text:span text:style-name="T43">And </text:span><text:span text:style-name="T45">no man</text:span><text:span text:style-name="T32">G3762</text:span> <text:span text:style-name="T45">in heaven</text:span><text:span text:style-name="T43">, nor in earth, neither under the earth, was able to open the book, neither to look thereon.</text:span></text:p>
          </table:table-cell>
        </table:table-row>
        <table:table-row>
          <table:table-cell table:style-name="Table18.A2" office:value-type="string">
            <text:p text:style-name="P234"><text:span text:style-name="T15">Revelation 6:9</text:span><text:span text:style-name="T43"><text:line-break/></text:span><text:span text:style-name="T389">9 </text:span><text:span text:style-name="T43">And when he had opened the fifth seal, I saw </text:span><text:span text:style-name="T45">under the altar the souls of them that were slain for the word of God</text:span><text:span text:style-name="T43">, and for the testimony which they held:</text:span></text:p>
          </table:table-cell>
        </table:table-row>
      </table:table>
      <text:list text:style-name="L31">
        <text:list-item>
          <text:p text:style-name="P235"><text:span text:style-name="T590">I</text:span><text:span text:style-name="T591">n </text:span><text:span text:style-name="T15">Revelation</text:span><text:span text:style-name="T591"> we </text:span><text:span text:style-name="T592">now </text:span><text:span text:style-name="T593">see </text:span><text:span text:style-name="T594">that</text:span><text:span text:style-name="T593"> there are</text:span><text:span text:style-name="T595"> </text:span><text:span text:style-name="T596">men </text:span><text:span text:style-name="T597">and women</text:span><text:span text:style-name="T596"> in heaven with God.</text:span></text:p>
        </text:list-item>
        <text:list-item>
          <text:p text:style-name="P236"><text:span text:style-name="T598">N</text:span><text:span text:style-name="T402">otice also </text:span><text:span text:style-name="T599">that t</text:span><text:span text:style-name="T402">here is a transition </text:span><text:span text:style-name="T599">in general language </text:span><text:span text:style-name="T402">from the old testament until Jesus’ resurrection to after His resurrection in </text:span><text:span text:style-name="T599">that </text:span><text:span text:style-name="T402">how the dead in Christ are </text:span><text:span text:style-name="T600">written</text:span><text:span text:style-name="T402"> of.</text:span></text:p>
        </text:list-item>
        <text:list-item>
          <text:p text:style-name="P237">Where in the old testament can we read about the dead in Christ being in heaven with God <text:span text:style-name="T601">(not in the future tense)</text:span>?</text:p>
        </text:list-item>
      </text:list>
      <text:p text:style-name="P51"/>
      <text:p text:style-name="P51"/>
      <text:p text:style-name="P238">Upon white horses</text:p>
      <text:p text:style-name="P238"/>
      <table:table table:name="Table19" table:style-name="Table19">
        <table:table-column table:style-name="Table19.A"/>
        <table:table-row>
          <table:table-cell table:style-name="Table19.A1" office:value-type="string">
            <text:p text:style-name="P239"><text:span text:style-name="T15">1 Thessalonians 4:14-17</text:span><text:span text:style-name="T91"><text:line-break/></text:span><text:span text:style-name="T602">14</text:span><text:span text:style-name="T91"> For if we believe that Jesus died and rose again, even so </text:span><text:span text:style-name="T92">them also which </text:span><text:span text:style-name="T499">sleep in Jesus</text:span><text:span text:style-name="T92"> will God bring with him</text:span><text:span text:style-name="T91">.</text:span></text:p>
          </table:table-cell>
        </table:table-row>
      </table:table>
      <text:list text:style-name="L32">
        <text:list-item>
          <text:p text:style-name="P240"><text:span text:style-name="T97">Those who die (sleep) in Jesus will be with Him when He returns</text:span><text:span text:style-name="T603">.</text:span></text:p>
          <text:list>
            <text:list-item>
              <text:p text:style-name="P241">Note that this (or any other verse) does not necessitate that they are <text:span text:style-name="T100">always</text:span><text:span text:style-name="T270"> with Him until that happens.</text:span></text:p>
            </text:list-item>
          </text:list>
        </text:list-item>
        <text:list-item>
          <text:p text:style-name="P242"><text:span text:style-name="T604">T</text:span><text:span text:style-name="T605">his </text:span><text:span text:style-name="T606">(and other new testament verses) are</text:span><text:span text:style-name="T605"> in stark contrast to verses </text:span><text:span text:style-name="T607">that took place in time </text:span><text:span text:style-name="T608">before Jesus’ resurrection</text:span><text:span text:style-name="T605"> such as </text:span><text:span text:style-name="T15">Genesis 37:35</text:span><text:span text:style-name="T605"> where we see a Godly </text:span><text:span text:style-name="T609">man</text:span><text:span text:style-name="T605"> </text:span><text:span text:style-name="T610">(</text:span><text:span text:style-name="T15">Genesis 49:18</text:span><text:span text:style-name="T610">) </text:span><text:span text:style-name="T605">speaking of going to hell.</text:span></text:p>
        </text:list-item>
      </text:list>
      <text:p text:style-name="P243"/>
      <text:p text:style-name="P244"/>
      <text:p text:style-name="P245"><text:span text:style-name="T611">Most</text:span><text:span text:style-name="T612"> deceptions are </text:span><text:span text:style-name="T613">mingled with truth </text:span><text:span text:style-name="T614">(</text:span><text:span text:style-name="T615">Isaiah 14:14b</text:span><text:span text:style-name="T614">)</text:span></text:p>
      <text:p text:style-name="P246"/>
      <table:table table:name="Table5" table:style-name="Table5">
        <table:table-column table:style-name="Table5.A"/>
        <table:table-row>
          <table:table-cell table:style-name="Table5.A1" office:value-type="string">
            <text:p text:style-name="P247"><text:span text:style-name="T15">2 Timothy 2:15-18</text:span><text:span text:style-name="T91"><text:line-break/></text:span><text:span text:style-name="T616">15</text:span><text:span text:style-name="T91"> Study to shew thyself approved unto God, a workman that needeth not to be ashamed, rightly dividing the word of truth.<text:line-break/></text:span><text:span text:style-name="T616">16</text:span><text:span text:style-name="T91"> But shun profane </text:span><text:span text:style-name="T516">and</text:span><text:span text:style-name="T91"> vain babblings: for they will increase unto more ungodliness.<text:line-break/></text:span><text:span text:style-name="T616">17</text:span><text:span text:style-name="T91"> And their word will eat as doth a canker: of whom is Hymenaeus and Philetus;<text:line-break/></text:span><text:span text:style-name="T616">18</text:span><text:span text:style-name="T91"> Who concerning the truth have erred, </text:span><text:span text:style-name="T92">saying that the resurrection is past already</text:span><text:span text:style-name="T91">; and overthrow the faith of some.</text:span></text:p>
          </table:table-cell>
        </table:table-row>
      </table:table>
      <text:list text:continue-numbering="true" text:style-name="L32">
        <text:list-item>
          <text:p text:style-name="P248"><text:span text:style-name="T605">W</text:span><text:span text:style-name="T201">hat if Hymenaeus and Philetus used the resurrection of the saints that occurred after Jesus’ to deceive some?</text:span></text:p>
        </text:list-item>
        <text:list-item>
          <text:p text:style-name="P249">It’s not a far stretch that they may have pointed to that event (which was likely noised abroad quite quickly) as “proof” for their deception <text:span text:style-name="T617">and that’s how some people believed them.</text:span></text:p>
        </text:list-item>
      </text:list>
      <text:p text:style-name="P250"/>
      <text:p text:style-name="P250"/>
      <text:p text:style-name="P251">No new thing under the sun</text:p>
      <text:p text:style-name="P250"/>
      <table:table table:name="Table20" table:style-name="Table20">
        <table:table-column table:style-name="Table20.A"/>
        <table:table-row>
          <table:table-cell table:style-name="Table20.A1" office:value-type="string">
            <text:p text:style-name="P252">2 Thessalonians 2:1-3</text:p>
            <text:p text:style-name="P253"><text:span text:style-name="T32">1</text:span> Now we beseech you, brethren, by the coming of our Lord Jesus Christ, and by our gathering together unto him,</text:p>
            <text:p text:style-name="P253"><text:span text:style-name="T32">2</text:span> That ye be not soon shaken in mind, or be troubled, neither <text:span text:style-name="T33">by spirit</text:span>, nor <text:span text:style-name="T33">by word</text:span>, nor <text:span text:style-name="T33">by letter as from us</text:span>, as that the day of Christ is at hand.</text:p>
            <text:p text:style-name="P253"><text:span text:style-name="T32">3</text:span> Let no man deceive you by any means: for that day shall not come, except there come a falling away first, and that man of sin be revealed, the son of perdition;</text:p>
          </table:table-cell>
        </table:table-row>
      </table:table>
      <text:list text:style-name="L33">
        <text:list-item>
          <text:p text:style-name="P254"><text:span text:style-name="T618">T</text:span>hat same deception could have been some of the content of these false words and false letters <text:span text:style-name="T619">which made their way all the way to Thessalonica.</text:span></text:p>
        </text:list-item>
      </text:list>
      <text:p text:style-name="P255"><text:soft-page-break/><text:span text:style-name="T620">A </text:span><text:span text:style-name="T621">curious prophecy</text:span></text:p>
      <text:p text:style-name="Standard"/>
      <table:table table:name="Table26" table:style-name="Table26">
        <table:table-column table:style-name="Table26.A"/>
        <table:table-row>
          <table:table-cell table:style-name="Table26.A1" office:value-type="string">
            <text:p text:style-name="P256"><text:span text:style-name="T15">Zechariah 9:9-11</text:span><text:span text:style-name="T43"><text:line-break/></text:span><text:span text:style-name="T389">9</text:span><text:span text:style-name="T43"> Rejoice greatly, O daughter of Zion; shout, O daughter of Jerusalem: behol</text:span><text:span text:style-name="T44">d, </text:span><text:span text:style-name="T622">thy King</text:span><text:span text:style-name="T44"> cometh unto thee: </text:span><text:span text:style-name="T622">he</text:span><text:span text:style-name="T44"> </text:span><text:span text:style-name="T623">is</text:span><text:span text:style-name="T44"> just, and having salvation; lowly, and riding upon an ass, and upon a colt the foal of an ass.</text:span></text:p>
            <text:p text:style-name="P257"><text:span text:style-name="T32">10</text:span> And I will cut off the chariot from Ephraim, and the horse from Jerusalem, and the battle bow shall be cut off: and <text:span text:style-name="T124">he</text:span> shall speak peace unto the heathen: and <text:span text:style-name="T124">his</text:span> dominion <text:span text:style-name="T129">shall be</text:span> from sea <text:span text:style-name="T129">even</text:span> to sea, and from the river <text:span text:style-name="T129">even</text:span> to the ends of the earth.</text:p>
            <text:p text:style-name="P256"><text:span text:style-name="T389">11</text:span><text:span text:style-name="T43"> As for </text:span><text:span text:style-name="T622">thee</text:span><text:span text:style-name="T43"> also, </text:span><text:span text:style-name="T624">by the blood of thy covenant</text:span><text:span text:style-name="T43"> </text:span><text:span text:style-name="T45">I have sent forth</text:span><text:span text:style-name="T625">H8765 (H8840, H8816)</text:span> <text:span text:style-name="T622">thy</text:span><text:span text:style-name="T626"> prisoner</text:span><text:span text:style-name="T624">s</text:span><text:span text:style-name="T44"> out of </text:span><text:span text:style-name="T627">the pit</text:span><text:span text:style-name="T43"> wherein </text:span><text:span text:style-name="T628">is</text:span><text:span text:style-name="T43"> </text:span><text:span text:style-name="T627">no water</text:span><text:span text:style-name="T43">.</text:span></text:p>
          </table:table-cell>
        </table:table-row>
      </table:table>
      <text:list xml:id="list3802790496" text:style-name="L34">
        <text:list-item>
          <text:p text:style-name="P258">In the chapter beginning the messianic prophecies and description of the messianic kingdom in the book of <text:span text:style-name="T15">Zechariah</text:span>, <text:span text:style-name="T629">which follows the remnant that returned from Babylon, </text:span>we see this prophecy about <text:span text:style-name="T630">a King</text:span> riding into Jerusalem <text:span text:style-name="T630">which we know was fulfilled by Jesus in </text:span><text:span text:style-name="T15">Mat 21</text:span><text:span text:style-name="T630">, </text:span><text:span text:style-name="T15">Mar</text:span><text:span text:style-name="T631">k</text:span><text:span text:style-name="T15"> 11</text:span><text:span text:style-name="T630">, </text:span><text:span text:style-name="T15">Luk</text:span><text:span text:style-name="T631">e </text:span><text:span text:style-name="T15">19</text:span><text:span text:style-name="T39">,</text:span> <text:span text:style-name="T630">and </text:span><text:span text:style-name="T15">Joh</text:span><text:span text:style-name="T631">n</text:span><text:span text:style-name="T15"> 12</text:span><text:span text:style-name="T630">.</text:span></text:p>
        </text:list-item>
        <text:list-item>
          <text:p text:style-name="P259"><text:span text:style-name="T632">Notice that the LORD is speaking to the Lord (v</text:span><text:span text:style-name="T15">9</text:span><text:span text:style-name="T632"> “thy King” is the </text:span><text:span text:style-name="T633">antecedent to the pronoun </text:span><text:span text:style-name="T632">“thee” in v</text:span><text:span text:style-name="T15">11</text:span><text:span text:style-name="T632">).</text:span></text:p>
        </text:list-item>
        <text:list-item>
          <text:p text:style-name="P260"><text:span text:style-name="T634">If we read </text:span><text:span text:style-name="T39">v</text:span><text:span text:style-name="T15">11 </text:span><text:span text:style-name="T635">literally:</text:span></text:p>
          <text:list>
            <text:list-item>
              <text:p text:style-name="P261"><text:span text:style-name="T270">By the blood of Jesus I have sent forth His prisoners out of the </text:span><text:span text:style-name="T636">dry </text:span><text:span text:style-name="T270">hole in the ground.</text:span></text:p>
              <text:list>
                <text:list-item>
                  <text:p text:style-name="P262"><text:span text:style-name="T637">Note that a pit can also be a place where water is drawn </text:span><text:span text:style-name="T638">(</text:span><text:span text:style-name="T639">as in</text:span><text:span text:style-name="T637"> </text:span><text:span text:style-name="T15">Isa</text:span><text:span text:style-name="T640">iah</text:span><text:span text:style-name="T15"> 30:14</text:span><text:span text:style-name="T637">).</text:span></text:p>
                </text:list-item>
                <text:list-item>
                  <text:p text:style-name="P263"><text:span text:style-name="T270">What prisoners? The children of Israel when they were in captivity? Where can we read about them being held prisoner in a dry hole in the ground? </text:span><text:span text:style-name="T641">Where can we read in scripture anywhere about this happening?</text:span></text:p>
                </text:list-item>
                <text:list-item>
                  <text:p text:style-name="P264"><text:span text:style-name="T642">There is very little evidence to support a literal interpretation.</text:span><text:span text:style-name="T643"> </text:span><text:span text:style-name="T15">Gen 37:24</text:span><text:span text:style-name="T643"> (Joseph being cast into a pit with no water) </text:span><text:span text:style-name="T644">and </text:span><text:span text:style-name="T15">Jer 38:6</text:span><text:span text:style-name="T643"> </text:span><text:span text:style-name="T644">(Jeremiah being cast into a dungeon wherein was no water)</text:span><text:span text:style-name="T642"> appear to be the closest references but neither one qualify because they were singular men </text:span><text:span text:style-name="T645">and “thy prisoner</text:span><text:span text:style-name="T646">s</text:span><text:span text:style-name="T645">” is plural.</text:span></text:p>
                </text:list-item>
              </text:list>
            </text:list-item>
          </text:list>
        </text:list-item>
        <text:list-item>
          <text:p text:style-name="P265"><text:span text:style-name="T647">If we read </text:span>v<text:span text:style-name="T15">11</text:span><text:span text:style-name="T647"> symbolically </text:span><text:span text:style-name="T648">based on what we’ve learned:</text:span></text:p>
          <text:list>
            <text:list-item>
              <text:p text:style-name="P265"><text:span text:style-name="T647">By the blood of Jesus </text:span><text:span text:style-name="T648">I have sent forth His prisoners out of hell wherein is no </text:span><text:span text:style-name="T649">living water</text:span><text:span text:style-name="T648">.</text:span></text:p>
              <text:list>
                <text:list-item>
                  <text:p text:style-name="P266"><text:span text:style-name="T648">I</text:span><text:span text:style-name="T650">n </text:span><text:span text:style-name="T15">Psalm 63:1</text:span><text:span text:style-name="T650"> David describes the wilderness of Judah as a “dry and thirsty land, where no water is”.</text:span></text:p>
                  <text:list>
                    <text:list-item>
                      <text:p text:style-name="P267"><text:span text:style-name="T651">Not once are we told about David having any trouble finding food </text:span><text:span text:style-name="T652">or</text:span><text:span text:style-name="T651"> water </text:span><text:span text:style-name="T653">for him and the men with him </text:span><text:span text:style-name="T651">aside from </text:span><text:span text:style-name="T654">when David first fled to Nob and </text:span><text:span text:style-name="T651">he requests the shewbread </text:span><text:span text:style-name="T654">from Ahimelech </text:span><text:span text:style-name="T651">in </text:span><text:span text:style-name="T15">1Sa 21:3</text:span><text:span text:style-name="T651">.</text:span></text:p>
                      <text:list>
                        <text:list-item>
                          <text:p text:style-name="P267"><text:span text:style-name="T655">In </text:span><text:span text:style-name="T15">1Sa 25:18</text:span><text:span text:style-name="T655"> </text:span><text:span text:style-name="T656">(Abigail) </text:span><text:span text:style-name="T655">and </text:span><text:span text:style-name="T15">2Sa 19:32</text:span><text:span text:style-name="T656"> (Barzillai) we see the opposite.</text:span></text:p>
                        </text:list-item>
                      </text:list>
                    </text:list-item>
                    <text:list-item>
                      <text:p text:style-name="P268"><text:span text:style-name="T657">There is a semi-colon at the end of </text:span><text:span text:style-name="T15">Psalm 63</text:span><text:span text:style-name="T658"> </text:span><text:span text:style-name="T659">verse </text:span><text:span text:style-name="T15">1</text:span><text:span text:style-name="T657"> </text:span><text:span text:style-name="T660">and </text:span><text:span text:style-name="T661">David</text:span><text:span text:style-name="T660"> goes on to describe what exactly he’s been longing </text:span><text:span text:style-name="T662">for</text:span><text:span text:style-name="T660"> and it’s </text:span><text:span text:style-name="T663">all</text:span><text:span text:style-name="T661"> spiritual things</text:span><text:span text:style-name="T660">.</text:span></text:p>
                    </text:list-item>
                  </text:list>
                </text:list-item>
                <text:list-item>
                  <text:p text:style-name="P269"><text:span text:style-name="T660">I</text:span><text:span text:style-name="T664">n </text:span><text:span text:style-name="T15">John 4:10</text:span><text:span text:style-name="T664"> Jesus offers “</text:span><text:span text:style-name="T665">living water</text:span><text:span text:style-name="T664">” to the Samaritan woman </text:span><text:span text:style-name="T666">and in</text:span><text:span text:style-name="T667"> </text:span><text:span text:style-name="T15">John 4:14</text:span><text:span text:style-name="T667"> </text:span><text:span text:style-name="T666">He</text:span><text:span text:style-name="T667"> describes the living water. </text:span><text:span text:style-name="T668">Living water comes from Jesus</text:span><text:span text:style-name="T669">.</text:span></text:p>
                  <text:list>
                    <text:list-item>
                      <text:p text:style-name="P270"><text:span text:style-name="T670">If </text:span><text:span text:style-name="T671">living water symbolizes the Holy Ghost that </text:span><text:span text:style-name="T672">lines up with what we’ve learned </text:span><text:span text:style-name="T669">(</text:span><text:span text:style-name="T15">Acts 2:38</text:span><text:span text:style-name="T669">, </text:span><text:span text:style-name="T15">10:45</text:span><text:span text:style-name="T669">)</text:span><text:span text:style-name="T671">.</text:span></text:p>
                    </text:list-item>
                  </text:list>
                </text:list-item>
                <text:list-item>
                  <text:p text:style-name="P269"><text:span text:style-name="T660">I</text:span><text:span text:style-name="T664">n </text:span><text:span text:style-name="T15">John 7:38</text:span><text:span text:style-name="T664"> Jesus tells us that “</text:span><text:span text:style-name="T665">rivers of living water</text:span><text:span text:style-name="T664">” shall flow out of the belly of he that believeth on Jesus. </text:span><text:span text:style-name="T673">How many reborn Christians have you seen running around with literal rivers </text:span><text:span text:style-name="T674">of water</text:span><text:span text:style-name="T673"> flowing out of their bellies? You haven’t </text:span><text:span text:style-name="T675">and you won’t </text:span><text:span text:style-name="T673">because He was talking about spiritual </text:span><text:span text:style-name="T674">things</text:span><text:span text:style-name="T673">.</text:span></text:p>
                </text:list-item>
              </text:list>
            </text:list-item>
          </text:list>
        </text:list-item>
        <text:list-item>
          <text:p text:style-name="P271"><text:span text:style-name="T635">Regarding </text:span><text:span text:style-name="T39">v</text:span><text:span text:style-name="T15">11</text:span><text:span text:style-name="T635"> past tense “have sent forth”</text:span></text:p>
          <text:list>
            <text:list-item>
              <text:p text:style-name="P272"><text:span text:style-name="T676">T</text:span><text:span text:style-name="T270">he </text:span><text:span text:style-name="T677">verb </text:span><text:span text:style-name="T270">Stem Piel (H8840) and the mood perfect (H8816) </text:span><text:span text:style-name="T677">for this phrase </text:span><text:span text:style-name="T270">does not necessitate </text:span><text:span text:style-name="T677">that the </text:span><text:span text:style-name="T678">consequence</text:span><text:span text:style-name="T677"> of the completed action happened in the past</text:span><text:span text:style-name="T270">. </text:span><text:span text:style-name="T679">F</text:span><text:span text:style-name="T270">or example, the </text:span><text:span text:style-name="T100">commandment</text:span><text:span text:style-name="T270"> went forth (</text:span><text:span text:style-name="T680">the completed action</text:span><text:span text:style-name="T270">), </text:span><text:span text:style-name="T681">and then</text:span><text:span text:style-name="T270"> the </text:span><text:span text:style-name="T682">fulfillment of said commandment</text:span><text:span text:style-name="T270"> happen</text:span><text:span text:style-name="T683">s later</text:span><text:span text:style-name="T270">.</text:span></text:p>
            </text:list-item>
            <text:list-item>
              <text:p text:style-name="P273"><text:span text:style-name="T684">Other examples of the commandment going forth before the manifestation</text:span><text:span text:style-name="T685"> </text:span><text:span text:style-name="T684">of a thing:</text:span></text:p>
              <text:list>
                <text:list-item>
                  <text:p text:style-name="P273"><text:span text:style-name="T15">1Pe 1:20</text:span><text:span text:style-name="T39"> – </text:span><text:span text:style-name="T686">Jesus </text:span><text:span text:style-name="T687">was</text:span><text:span text:style-name="T686"> ordained before the foundation of the world</text:span><text:span text:style-name="T688">.</text:span></text:p>
                </text:list-item>
                <text:list-item>
                  <text:p text:style-name="P273"><text:span text:style-name="T15">Eph 1:4</text:span><text:span text:style-name="T686"> – </text:span><text:span text:style-name="T689">God</text:span><text:span text:style-name="T690"> hath chosen</text:span><text:span text:style-name="T691"> us (saints) </text:span><text:span text:style-name="T686">before the foundation of the world.</text:span></text:p>
                  <text:list>
                    <text:list-item>
                      <text:p text:style-name="P258"><text:span text:style-name="T15">Eph 1:5</text:span><text:span text:style-name="T39"> </text:span><text:span text:style-name="T692">– </text:span><text:span text:style-name="T693">having predestinated us</text:span> <text:span text:style-name="T694">(past tense, but includes anyone not saved yet)</text:span></text:p>
                    </text:list-item>
                  </text:list>
                </text:list-item>
                <text:list-item>
                  <text:p text:style-name="P274"><text:span text:style-name="T15">Gen 3:15, 12:1-3</text:span><text:span text:style-name="T695"> (and many others) – Any of God’s promises. Since God cannot lie, its as good as done when He speaks it.</text:span></text:p>
                </text:list-item>
              </text:list>
            </text:list-item>
          </text:list>
        </text:list-item>
      </text:list>
      <text:list text:continue-list="list123042897923386" text:style-name="L9">
        <text:list-header>
          <text:p text:style-name="P275"/>
        </text:list-header>
      </text:list>
      <text:p text:style-name="P276"><text:soft-page-break/></text:p>
      <text:p text:style-name="P277"><text:span text:style-name="T696">And so if we assemble the order of events from what we’ve learned we get</text:span><text:span text:style-name="T697">:</text:span></text:p>
      <text:p text:style-name="P278"/>
      <text:list xml:id="list2388458731" text:style-name="L35">
        <text:list-item>
          <text:p text:style-name="P279"><text:span text:style-name="T698">Jesus dies on the cross </text:span><text:span text:style-name="T699">at the ninth hour </text:span><text:span text:style-name="T700">(</text:span><text:span text:style-name="T701">Mark 15:34</text:span><text:span text:style-name="T702">, </text:span><text:span text:style-name="T701">Luke 23:44</text:span><text:span text:style-name="T700">).</text:span></text:p>
          <text:list>
            <text:list-item>
              <text:p text:style-name="P280"><text:span text:style-name="T703">God the Father transfers the authority over </text:span>the gates of hell <text:span text:style-name="T703">to Jesus.</text:span></text:p>
            </text:list-item>
          </text:list>
        </text:list-item>
        <text:list-item>
          <text:p text:style-name="P281">Jesus unlocks the gates of hell.</text:p>
        </text:list-item>
        <text:list-item>
          <text:p text:style-name="P282"><text:span text:style-name="T704">Jesus’</text:span> soul goes to hell.</text:p>
        </text:list-item>
        <text:list-item>
          <text:p text:style-name="P282"><text:span text:style-name="T705">Jesus</text:span> preaches to the dead.</text:p>
        </text:list-item>
        <text:list-item>
          <text:p text:style-name="P283"><text:span text:style-name="T698">Those who accept</text:span><text:span text:style-name="T706">ed</text:span><text:span text:style-name="T698"> </text:span><text:span text:style-name="T707">Jesus </text:span><text:span text:style-name="T708">went</text:span><text:span text:style-name="T698"> to God in </text:span><text:span text:style-name="T708">paradise </text:span><text:span text:style-name="T709">(</text:span><text:span text:style-name="T701">Isa</text:span><text:span text:style-name="T710">iah</text:span><text:span text:style-name="T701"> 49:9b</text:span><text:span text:style-name="T709">).</text:span></text:p>
          <text:list>
            <text:list-item>
              <text:p text:style-name="P284"><text:span text:style-name="T711">Including</text:span> the penitent thief on the cross next to Jesus.</text:p>
            </text:list-item>
          </text:list>
        </text:list-item>
        <text:list-item>
          <text:p text:style-name="P285">Those who reject<text:span text:style-name="T712">ed</text:span> Jesus <text:span text:style-name="T712">were</text:span> left <text:span text:style-name="T713">in the torment side of hell.</text:span></text:p>
          <text:list>
            <text:list-item>
              <text:p text:style-name="P286">All before the end of the day that Jesus died on the cross.</text:p>
            </text:list-item>
          </text:list>
        </text:list-item>
      </text:list>
      <text:list text:continue-list="list3802790496" text:style-name="L34">
        <text:list-item>
          <text:list>
            <text:list-item>
              <text:list>
                <text:list-item>
                  <text:p text:style-name="P274"><text:span text:style-name="T700">Jesus gave up the ghost at the ninth hour leaving three hours </text:span><text:span text:style-name="T714">left in that day </text:span><text:span text:style-name="T700">(</text:span><text:span text:style-name="T701">John 11:9</text:span><text:span text:style-name="T700">).</text:span></text:p>
                </text:list-item>
              </text:list>
            </text:list-item>
          </text:list>
        </text:list-item>
      </text:list>
      <text:list text:continue-list="list2388458731" text:style-name="L35">
        <text:list-item>
          <text:p text:style-name="P287"><text:span text:style-name="T700">When the evening of that first day was come </text:span><text:span text:style-name="T715">(which is the beginning of the next day)</text:span><text:span text:style-name="T700">, Joseph of Arimathaea takes Jesus’ body, wraps it in linen, and lays it in his own tomb (</text:span><text:span text:style-name="T701">Mat</text:span><text:span text:style-name="T716">thew</text:span><text:span text:style-name="T701"> 27:57-60</text:span><text:span text:style-name="T700">).</text:span></text:p>
        </text:list-item>
        <text:list-item>
          <text:p text:style-name="P288"><text:span text:style-name="T717">Two more</text:span><text:span text:style-name="T718"> </text:span><text:span text:style-name="T719">Biblical </text:span>days pass <text:span text:style-name="T718">on earth.</text:span></text:p>
        </text:list-item>
        <text:list-item>
          <text:p text:style-name="P288">Jesus is resurrected as the firstfruit <text:span text:style-name="T720">of the dead, </text:span><text:span text:style-name="T721">on the day of firstfruits and the first day of the week </text:span><text:span text:style-name="T722">(the eighth day; </text:span><text:span text:style-name="T723">the number eight</text:span><text:span text:style-name="T722"> </text:span><text:span text:style-name="T724">representing</text:span><text:span text:style-name="T722"> new beginnings).</text:span></text:p>
        </text:list-item>
        <text:list-item>
          <text:p text:style-name="P289">Some of the saints buried around Jerusalem are resurrected <text:span text:style-name="T725">and go into Jerusalem</text:span> <text:span text:style-name="T100">after</text:span> Jesus <text:span text:style-name="T726">is resurrected.</text:span></text:p>
        </text:list-item>
        <text:list-item>
          <text:p text:style-name="P289">40 days later Jesus ascend<text:span text:style-name="T727">s</text:span> <text:span text:style-name="T728">bodily </text:span>to heaven.</text:p>
          <text:list>
            <text:list-item>
              <text:p text:style-name="P290">We don’t know what happened to the resurrected saints <text:span text:style-name="T729">after they went into Jerusalem and were seen of many.</text:span></text:p>
              <text:list>
                <text:list-item>
                  <text:p text:style-name="P290">They could have gone <text:span text:style-name="T730">to heaven </text:span>with <text:span text:style-name="T730">Jesus.</text:span></text:p>
                </text:list-item>
                <text:list-item>
                  <text:p text:style-name="P290">They could have stayed <text:span text:style-name="T731">and </text:span>served God here.</text:p>
                </text:list-item>
                <text:list-item>
                  <text:p text:style-name="P291">They could have done and are doing both.</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lackChancery" svg:font-family="BlackChancery"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DejaVu Sans" svg:font-family="'DejaVu Sans'" style:font-family-generic="system" style:font-pitch="variable"/>
    <style:font-face style:name="Gabriela Nerd Font" svg:font-family="'Gabriela Nerd Fon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NotoSans NF" svg:font-family="'NotoSans NF'" style:font-family-generic="system" style:font-pitch="variable"/>
    <style:font-face style:name="OpenSymbol" svg:font-family="OpenSymbol" style:font-charset="x-symbol"/>
  </office:font-face-decls>
  <office:styles>
    <draw:fill-image draw:name="Kraft-paper" xlink:href="Pictures/10000000000003E80000029B20DA4BF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874in" style:writing-mode="lr-tb"/>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0" fo:widows="0" fo:hyphenation-ladder-count="no-limit" fo:hyphenation-keep="auto" loext:hyphenation-keep-type="column" loext:hyphenation-keep-line="false" style:writing-mode="lr-tb"/>
      <style:text-properties fo:color="#000000" loext:opacity="100%" style:font-name="Carlito1" fo:font-family="Carlito" style:font-style-name="Regular" style:font-family-generic="swiss" style:font-pitch="variable" fo:font-size="12pt" fo:language="en" fo:country="US" style:letter-kerning="fals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next-style-name="Table"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padding="0.0201in" fo:border="0.74pt solid #000000" style:shadow="#808080 0.0402in 0.0402in"/>
    </style:style>
    <style:style style:name="Comment"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Sans NF" style:font-family-complex="'NotoSans NF'"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fo:border="none" fo:padding="0.0201in"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draw:fill="bitmap" draw:fill-color="#fffde7" draw:gradient-step-count="0" draw:fill-hatch-solid="false" draw:fill-image-name="Kraft-paper" draw:fill-image-width="1in" draw:fill-image-height="1in" style:repeat="stretch" draw:fill-image-ref-point-x="0%" draw:fill-image-ref-point-y="0%" draw:fill-image-ref-point="center" draw:tile-repeat-offset="0% vertical" style:footnote-max-height="0in" loext:margin-gutter="0in">
        <style:background-image xlink:href="Pictures/10000000000003E80000029B20DA4BF0.pn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fffde7" draw:gradient-step-count="0" draw:fill-hatch-solid="false" draw:fill-image-name="Kraft-paper" draw:fill-image-width="1in" draw:fill-image-height="1in"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7-11T12:30:40.523723679</dc:date>
    <meta:editing-cycles>2360</meta:editing-cycles>
    <meta:editing-duration>P3DT13H42M49S</meta:editing-duration>
    <meta:generator>LibreOffice/26.2.4.2$Linux_X86_64 LibreOffice_project/64a984c51f4702dbd3710b13428c673a2f1292e7</meta:generator>
    <meta:print-date>2025-07-04T21:20:08.455003500</meta:print-date>
    <meta:printed-by>PDF files</meta:printed-by>
    <dc:title>The saints that resurrected after Jesus</dc:title>
    <meta:document-statistic meta:table-count="39" meta:image-count="0" meta:object-count="0" meta:page-count="17" meta:paragraph-count="406" meta:word-count="8744" meta:character-count="45863" meta:non-whitespace-character-count="37630"/>
    <meta:user-defined meta:name="AppVersion">15.0000</meta:user-defined>
  </office:meta>
</office:document-meta>
</file>