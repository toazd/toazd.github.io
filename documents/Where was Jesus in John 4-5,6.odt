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Liberation Sans" fo:font-size="12pt" officeooo:rsid="00186055" officeooo:paragraph-rsid="00186055" style:font-size-asian="12pt" style:font-size-complex="12pt"/>
    </style:style>
    <style:style style:name="P2" style:family="paragraph" style:parent-style-name="Table_20_Contents">
      <style:text-properties style:font-name="Liberation Sans" fo:font-size="13pt" officeooo:paragraph-rsid="0012caaa" style:font-size-asian="13pt" style:font-size-complex="13pt"/>
    </style:style>
    <style:style style:name="P3" style:family="paragraph" style:parent-style-name="Table_20_Contents">
      <style:text-properties style:font-name="Liberation Sans" fo:font-size="13pt" style:font-size-asian="13pt" style:font-size-complex="13pt"/>
    </style:style>
    <style:style style:name="P4" style:family="paragraph" style:parent-style-name="Text_20_body" style:list-style-name="L1">
      <style:text-properties style:font-name="Liberation Sans" fo:font-size="13pt" officeooo:paragraph-rsid="00155dcf" style:font-size-asian="13pt" style:font-size-complex="13pt"/>
    </style:style>
    <style:style style:name="P5" style:family="paragraph" style:parent-style-name="Table_20_Contents">
      <style:text-properties style:font-name="Liberation Sans" fo:font-size="13pt" officeooo:paragraph-rsid="000f76a5" style:font-size-asian="13pt" style:font-size-complex="13pt"/>
    </style:style>
    <style:style style:name="P6" style:family="paragraph" style:parent-style-name="Standard" style:list-style-name="L2">
      <style:text-properties style:font-name="Liberation Sans" fo:font-size="13pt" officeooo:rsid="00218b15" officeooo:paragraph-rsid="00218b15" style:font-size-asian="13pt" style:font-size-complex="13pt"/>
    </style:style>
    <style:style style:name="P7" style:family="paragraph" style:parent-style-name="Standard">
      <style:text-properties style:font-name="Liberation Sans" fo:font-size="13pt" style:font-size-asian="13pt" style:font-size-complex="13pt"/>
    </style:style>
    <style:style style:name="T1" style:family="text">
      <style:text-properties officeooo:rsid="001dc719"/>
    </style:style>
    <style:style style:name="T2" style:family="text">
      <style:text-properties officeooo:rsid="0023edc7"/>
    </style:style>
    <style:style style:name="T3" style:family="text">
      <style:text-properties fo:color="#127622" loext:opacity="100%" officeooo:rsid="001dc719"/>
    </style:style>
    <style:style style:name="T4" style:family="text">
      <style:text-properties officeooo:rsid="001f34c4"/>
    </style:style>
    <style:style style:name="T5" style:family="text">
      <style:text-properties officeooo:rsid="0025de3d"/>
    </style:style>
    <style:style style:name="T6" style:family="text">
      <style:text-properties officeooo:rsid="00204a0f"/>
    </style:style>
    <style:style style:name="T7" style:family="text">
      <style:text-properties fo:color="#127622" loext:opacity="100%" officeooo:rsid="001f34c4"/>
    </style:style>
    <style:style style:name="T8" style:family="text">
      <style:text-properties officeooo:rsid="001fba6e"/>
    </style:style>
    <style:style style:name="T9" style:family="text">
      <style:text-properties style:text-position="0% 100%" officeooo:rsid="0012caaa"/>
    </style:style>
    <style:style style:name="T10" style:family="text">
      <style:text-properties style:text-position="0% 100%" officeooo:rsid="00129e6e"/>
    </style:style>
    <style:style style:name="T11" style:family="text">
      <style:text-properties fo:font-style="italic"/>
    </style:style>
    <style:style style:name="T12" style:family="text">
      <style:text-properties style:text-position="33% 80%"/>
    </style:style>
    <style:style style:name="T13" style:family="text">
      <style:text-properties officeooo:rsid="00155dcf"/>
    </style:style>
    <style:style style:name="T14" style:family="text">
      <style:text-properties officeooo:rsid="0027a060"/>
    </style:style>
    <style:style style:name="T15" style:family="text">
      <style:text-properties officeooo:rsid="00291da3"/>
    </style:style>
    <style:style style:name="T16" style:family="text">
      <style:text-properties style:text-position="super 58%" officeooo:rsid="0011fe9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1b1a6"/>
    </style:style>
    <style:style style:name="T19" style:family="text">
      <style:text-properties style:text-position="super 58%" officeooo:rsid="000fcf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ators often cite Shechem as a possible location of Jacob’s well in John 4:6 <text:span text:style-name="T1">using Genesis 33:19 as a source. The problem </text:span><text:span text:style-name="T2">with that proposal </text:span><text:span text:style-name="T1">is that </text:span><text:span text:style-name="T3">Genesis 33:19</text:span><text:span text:style-name="T1"> </text:span><text:span text:style-name="T4">doesn’t even mention </text:span><text:span text:style-name="T1">the city of Shechem </text:span><text:span text:style-name="T4">(th</text:span><text:span text:style-name="T5">at</text:span><text:span text:style-name="T4"> error seems mostly due to corrupted translations)</text:span><text:span text:style-name="T1">. </text:span><text:span text:style-name="T6">Additionally</text:span><text:span text:style-name="T4">, the city mentioned in </text:span><text:span text:style-name="T7">Genesis 33:19</text:span><text:span text:style-name="T4"> is roughly 30 miles </text:span><text:span text:style-name="T8">south of Shechem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John 2:13</text:p>
            <text:p text:style-name="P2">And the Jews' passover was at hand, and Jesus went up to Jerusalem,</text:p>
            <text:p text:style-name="P3"/>
            <text:p text:style-name="P2"><text:span text:style-name="T9">John 2:</text:span><text:span text:style-name="T10">23</text:span></text:p>
            <text:p text:style-name="P2">Now when he was in Jerusalem at the passover, in the feast <text:span text:style-name="T11">day</text:span>, many believed in his name, when they saw the miracles which he did.<text:line-break/><text:line-break/>John 3:22<text:line-break/>After these things came Jesus and his disciples into the land of Judaea; and there he tarried with them, and baptized.</text:p>
            <text:p text:style-name="P2"><text:line-break/>John 4:3-4<text:line-break/><text:span text:style-name="T12">3</text:span> He left Judaea, and departed again into Galilee. <text:line-break/><text:span text:style-name="T12">4</text:span> And he must needs go through Samaria.</text:p>
          </table:table-cell>
        </table:table-row>
      </table:table>
      <text:list text:style-name="L1">
        <text:list-item>
          <text:p text:style-name="P4"><text:span text:style-name="T13">Heading north out of Jerusalem into Judaea, Jesus continues north towards Galilee and takes a break at Jacob’s well in Samaria. </text:span><text:span text:style-name="T14">Take note that Jesus has departed </text:span><text:span text:style-name="T15">from </text:span><text:span text:style-name="T14">and is north of Jerusalem at this point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">John 4:5-6<text:line-break/><text:span text:style-name="T12">5</text:span> Then cometh he to a city of Samaria, which is called Sychar<text:span text:style-name="T16">G4965</text:span>, <text:span text:style-name="T17">near to the parcel of ground that Jacob gave to his son Joseph</text:span>.</text:p>
            <text:p text:style-name="P5"><text:span text:style-name="T12">6</text:span> Now Jacob's well was there. Jesus therefore, being wearied with his journey, sat thus on the well: and it was about the sixth hour.</text:p>
          </table:table-cell>
        </table:table-row>
        <table:table-row>
          <table:table-cell table:style-name="Table1.A2" office:value-type="string">
            <text:p text:style-name="P5">G4965</text:p>
            <text:p text:style-name="P5">Συχάρ (Sychár | soo-khar')</text:p>
            <text:p text:style-name="P5">Derivation: of Hebrew origin (H7941);</text:p>
            <text:p text:style-name="P5">Strong's: Sychar (i.e. Shekar), a place in Palestine</text:p>
            <text:p text:style-name="P5">KJV: —Sychar.</text:p>
          </table:table-cell>
        </table:table-row>
      </table:table>
      <text:list text:style-name="L2">
        <text:list-item>
          <text:p text:style-name="P6">Sychar is believe<text:span text:style-name="T18">d</text:span> to be roughly 1 mile east of Shechem.</text:p>
        </text:list-item>
      </text:list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Genesis 48:21-22<text:line-break/><text:span text:style-name="T12">21</text:span> And Israel said unto Joseph, Behold, I die: but God shall be with you, and bring you again unto the land of your fathers. <text:line-break/><text:span text:style-name="T12">22</text:span> Moreover <text:span text:style-name="T17">I have given to thee one portion</text:span><text:span text:style-name="T19">H7926</text:span> above thy brethren, which I took out of the hand of the Amorite with my sword and with my bow.</text:p>
          </table:table-cell>
        </table:table-row>
        <table:table-row>
          <table:table-cell table:style-name="Table2.A2" office:value-type="string">
            <text:p text:style-name="P3">H7926</text:p>
            <text:p text:style-name="P3">שְׁכֶם (shᵉkem | shek-em')</text:p>
            <text:p text:style-name="P3">Derivation: from שָׁכַם;</text:p>
            <text:p text:style-name="P3">Strong's: the neck (between the shoulders) as the place of burdens; figuratively, the spur of ahill</text:p>
            <text:p text:style-name="P3">KJV: back, [idiom] consent, portion, shoulder.</text:p>
          </table:table-cell>
        </table:table-row>
        <table:table-row>
          <table:table-cell table:style-name="Table2.A2" office:value-type="string">
            <text:p text:style-name="P3">H7927</text:p>
            <text:p text:style-name="P3"><text:soft-page-break/>שְׁכֶם (Shᵉkem | shek-em')</text:p>
            <text:p text:style-name="P3">Derivation: the same as שְׁכֶם; ridge;</text:p>
            <text:p text:style-name="P3">Strong's: Shekem, a place in Palestine</text:p>
            <text:p text:style-name="P3">KJV: Shechem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9T16:10:22.420000000</meta:creation-date>
    <dc:date>2026-07-11T12:19:57.799965348</dc:date>
    <meta:editing-duration>PT47M14S</meta:editing-duration>
    <meta:editing-cycles>27</meta:editing-cycles>
    <meta:generator>LibreOffice/26.2.4.2$Linux_X86_64 LibreOffice_project/64a984c51f4702dbd3710b13428c673a2f1292e7</meta:generator>
    <meta:document-statistic meta:table-count="3" meta:image-count="0" meta:object-count="0" meta:page-count="2" meta:paragraph-count="26" meta:word-count="370" meta:character-count="2071" meta:non-whitespace-character-count="1725"/>
  </office:meta>
</office:document-meta>
</file>