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B" style:family="table-column">
      <style:table-column-properties style:column-width="3.95in" style:rel-column-width="3276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021in" fo:margin-left="0in" table:align="left"/>
    </style:style>
    <style:style style:name="Table3.A" style:family="table-column">
      <style:table-column-properties style:column-width="1.578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0.6958in"/>
    </style:style>
    <style:style style:name="Table3.D" style:family="table-column">
      <style:table-column-properties style:column-width="1.059in"/>
    </style:style>
    <style:style style:name="Table3.E" style:family="table-column">
      <style:table-column-properties style:column-width="1.0688in"/>
    </style:style>
    <style:style style:name="Table3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3.E1" style:family="table-cell">
      <style:table-cell-properties style:vertical-align="middle" fo:padding="0.0201in" fo:border="0.75pt solid #000000"/>
    </style:style>
    <style:style style:name="Table3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3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left"/>
    </style:style>
    <style:style style:name="Table4.A" style:family="table-column">
      <style:table-column-properties style:column-width="1.0688in"/>
    </style:style>
    <style:style style:name="Table4.B" style:family="table-column">
      <style:table-column-properties style:column-width="2.0153in"/>
    </style:style>
    <style:style style:name="Table4.C" style:family="table-column">
      <style:table-column-properties style:column-width="1.5854in"/>
    </style:style>
    <style:style style:name="Table4.D" style:family="table-column">
      <style:table-column-properties style:column-width="1.4681in"/>
    </style:style>
    <style:style style:name="Table4.E" style:family="table-column">
      <style:table-column-properties style:column-width="1.7625in"/>
    </style:style>
    <style:style style:name="Table4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4.E1" style:family="table-cell">
      <style:table-cell-properties style:vertical-align="middle" fo:padding="0.0201in" fo:border="0.75pt solid #000000"/>
    </style:style>
    <style:style style:name="Table4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4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" officeooo:rsid="007c3339" officeooo:paragraph-rsid="007c3339"/>
    </style:style>
    <style:style style:name="P2" style:family="paragraph" style:parent-style-name="Text_20_body">
      <style:text-properties officeooo:rsid="0021f8ed" officeooo:paragraph-rsid="0021f8ed"/>
    </style:style>
    <style:style style:name="P3" style:family="paragraph" style:parent-style-name="Text_20_body" style:list-style-name="L1">
      <style:text-properties officeooo:rsid="0021f8ed" officeooo:paragraph-rsid="0021f8ed"/>
    </style:style>
    <style:style style:name="P4" style:family="paragraph" style:parent-style-name="Text_20_body" style:list-style-name="L1">
      <style:text-properties officeooo:rsid="0027f93a" officeooo:paragraph-rsid="0027f93a"/>
    </style:style>
    <style:style style:name="P5" style:family="paragraph" style:parent-style-name="Text_20_body">
      <style:text-properties officeooo:rsid="00263555" officeooo:paragraph-rsid="00263555"/>
    </style:style>
    <style:style style:name="P6" style:family="paragraph" style:parent-style-name="Text_20_body" style:list-style-name="L2">
      <style:text-properties officeooo:rsid="0028021c" officeooo:paragraph-rsid="0028021c"/>
    </style:style>
    <style:style style:name="P7" style:family="paragraph" style:parent-style-name="Text_20_body">
      <style:text-properties officeooo:rsid="00301f0d" officeooo:paragraph-rsid="00301f0d"/>
    </style:style>
    <style:style style:name="P8" style:family="paragraph" style:parent-style-name="Table_20_Contents">
      <style:text-properties officeooo:rsid="00322385" officeooo:paragraph-rsid="00322385"/>
    </style:style>
    <style:style style:name="P9" style:family="paragraph" style:parent-style-name="Table_20_Contents">
      <style:text-properties officeooo:rsid="00324367" officeooo:paragraph-rsid="00324367"/>
    </style:style>
    <style:style style:name="P10" style:family="paragraph" style:parent-style-name="Table_20_Contents">
      <style:text-properties officeooo:rsid="00335d13" officeooo:paragraph-rsid="00335d13"/>
    </style:style>
    <style:style style:name="P11" style:family="paragraph" style:parent-style-name="Text_20_body">
      <style:text-properties officeooo:rsid="0062e843" officeooo:paragraph-rsid="0062e843"/>
    </style:style>
    <style:style style:name="P12" style:family="paragraph" style:parent-style-name="Table_20_Contents">
      <style:text-properties officeooo:rsid="00203886" officeooo:paragraph-rsid="00203886"/>
    </style:style>
    <style:style style:name="P13" style:family="paragraph" style:parent-style-name="Table_20_Contents">
      <style:text-properties officeooo:rsid="00203886" officeooo:paragraph-rsid="004ba632"/>
    </style:style>
    <style:style style:name="P14" style:family="paragraph" style:parent-style-name="Table_20_Contents">
      <style:text-properties officeooo:rsid="001e69fa" officeooo:paragraph-rsid="004bcc5c"/>
    </style:style>
    <style:style style:name="P15" style:family="paragraph" style:parent-style-name="Standard">
      <style:text-properties officeooo:paragraph-rsid="005d6d04"/>
    </style:style>
    <style:style style:name="P16" style:family="paragraph" style:parent-style-name="Standard">
      <style:text-properties officeooo:rsid="004bfc08" officeooo:paragraph-rsid="004bfc08"/>
    </style:style>
    <style:style style:name="P17" style:family="paragraph" style:parent-style-name="Standard">
      <style:text-properties style:font-name="Liberation Sans" fo:font-size="12pt" fo:font-weight="normal" officeooo:rsid="004bfc08" officeooo:paragraph-rsid="004bfc08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b0821" officeooo:paragraph-rsid="009c0b2b"/>
    </style:style>
    <style:style style:name="P19" style:family="paragraph" style:parent-style-name="Table_20_Contents">
      <style:paragraph-properties fo:text-align="center" style:justify-single-word="false"/>
      <style:text-properties officeooo:rsid="002b64c9" officeooo:paragraph-rsid="009c0b2b"/>
    </style:style>
    <style:style style:name="P20" style:family="paragraph" style:parent-style-name="Standard">
      <style:text-properties style:font-name="Liberation Sans" fo:font-size="12pt" fo:font-weight="normal" officeooo:rsid="004bfc08" officeooo:paragraph-rsid="009c0b2b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a07481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479a9" officeooo:paragraph-rsid="009479a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699d0f" officeooo:paragraph-rsid="00699d0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paragraph-rsid="00a07481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b05e4b" officeooo:paragraph-rsid="00b05e4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8d363e" officeooo:paragraph-rsid="00a07481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officeooo:rsid="008d363e" officeooo:paragraph-rsid="008d363e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15206" officeooo:paragraph-rsid="00915206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03b49" officeooo:paragraph-rsid="00903b4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fo:font-weight="normal" officeooo:rsid="006ad3d3" officeooo:paragraph-rsid="004bfc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officeooo:paragraph-rsid="00b81677"/>
    </style:style>
    <style:style style:name="P39" style:family="paragraph" style:parent-style-name="Standard" style:list-style-name="L3">
      <style:text-properties style:font-name="Liberation Sans" fo:font-size="12pt" fo:font-weight="normal" officeooo:rsid="00a88857" officeooo:paragraph-rsid="00aaf1a5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style:font-name="Liberation Sans" fo:font-size="12pt" fo:font-weight="normal" officeooo:rsid="00aaf1a5" officeooo:paragraph-rsid="00aaf1a5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style:font-name="Liberation Sans" fo:font-size="12pt" fo:font-weight="normal" officeooo:rsid="00a427cf" officeooo:paragraph-rsid="00a427cf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text-properties officeooo:paragraph-rsid="00b623c4"/>
    </style:style>
    <style:style style:name="P43" style:family="paragraph" style:parent-style-name="Standard">
      <style:text-properties style:font-name="Liberation Sans" fo:font-size="12pt" fo:font-weight="normal" officeooo:rsid="00a88857" officeooo:paragraph-rsid="00a8885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weight="normal" style:font-weight-asian="normal" style:font-weight-complex="normal"/>
    </style:style>
    <style:style style:name="T1" style:family="text">
      <style:text-properties officeooo:rsid="00279bba"/>
    </style:style>
    <style:style style:name="T2" style:family="text">
      <style:text-properties officeooo:rsid="00559bf6"/>
    </style:style>
    <style:style style:name="T3" style:family="text">
      <style:text-properties officeooo:rsid="00263555"/>
    </style:style>
    <style:style style:name="T4" style:family="text">
      <style:text-properties officeooo:rsid="002966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575222"/>
    </style:style>
    <style:style style:name="T8" style:family="text">
      <style:text-properties officeooo:rsid="003d9b27"/>
    </style:style>
    <style:style style:name="T9" style:family="text">
      <style:text-properties officeooo:rsid="00386c74"/>
    </style:style>
    <style:style style:name="T10" style:family="text">
      <style:text-properties officeooo:rsid="003100cd"/>
    </style:style>
    <style:style style:name="T11" style:family="text">
      <style:text-properties officeooo:rsid="00322385"/>
    </style:style>
    <style:style style:name="T12" style:family="text">
      <style:text-properties officeooo:rsid="00324367"/>
    </style:style>
    <style:style style:name="T13" style:family="text">
      <style:text-properties officeooo:rsid="00335d13"/>
    </style:style>
    <style:style style:name="T14" style:family="text">
      <style:text-properties officeooo:rsid="00352324"/>
    </style:style>
    <style:style style:name="T15" style:family="text">
      <style:text-properties officeooo:rsid="0067ce8d"/>
    </style:style>
    <style:style style:name="T16" style:family="text">
      <style:text-properties officeooo:rsid="0062e843"/>
    </style:style>
    <style:style style:name="T17" style:family="text">
      <style:text-properties fo:color="#127622" loext:opacity="100%" officeooo:rsid="0062e843"/>
    </style:style>
    <style:style style:name="T18" style:family="text">
      <style:text-properties officeooo:rsid="00686746"/>
    </style:style>
    <style:style style:name="T19" style:family="text">
      <style:text-properties officeooo:rsid="00694ffc"/>
    </style:style>
    <style:style style:name="T20" style:family="text">
      <style:text-properties officeooo:rsid="007dbb6a"/>
    </style:style>
    <style:style style:name="T21" style:family="text">
      <style:text-properties officeooo:rsid="008b3300"/>
    </style:style>
    <style:style style:name="T22" style:family="text">
      <style:text-properties officeooo:rsid="00865187"/>
    </style:style>
    <style:style style:name="T23" style:family="text">
      <style:text-properties officeooo:rsid="00866914"/>
    </style:style>
    <style:style style:name="T24" style:family="text">
      <style:text-properties officeooo:rsid="007ef7df"/>
    </style:style>
    <style:style style:name="T25" style:family="text">
      <style:text-properties officeooo:rsid="008a204f"/>
    </style:style>
    <style:style style:name="T26" style:family="text">
      <style:text-properties fo:color="#127622" loext:opacity="100%" officeooo:rsid="008a204f"/>
    </style:style>
    <style:style style:name="T27" style:family="text">
      <style:text-properties officeooo:rsid="00808974"/>
    </style:style>
    <style:style style:name="T28" style:family="text">
      <style:text-properties fo:font-weight="bold" officeooo:rsid="00808974" style:font-weight-asian="bold" style:font-weight-complex="bold"/>
    </style:style>
    <style:style style:name="T29" style:family="text">
      <style:text-properties fo:color="#127622" loext:opacity="100%" officeooo:rsid="00808974"/>
    </style:style>
    <style:style style:name="T30" style:family="text">
      <style:text-properties fo:color="#127622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2214cc"/>
    </style:style>
    <style:style style:name="T33" style:family="text">
      <style:text-properties officeooo:rsid="004ba632"/>
    </style:style>
    <style:style style:name="T34" style:family="text">
      <style:text-properties officeooo:rsid="002587c0"/>
    </style:style>
    <style:style style:name="T35" style:family="text">
      <style:text-properties officeooo:rsid="004bcc5c"/>
    </style:style>
    <style:style style:name="T36" style:family="text">
      <style:text-properties fo:color="#127622" loext:opacity="100%" officeooo:rsid="002d1612"/>
    </style:style>
    <style:style style:name="T37" style:family="text">
      <style:text-properties officeooo:rsid="002d1612"/>
    </style:style>
    <style:style style:name="T38" style:family="text">
      <style:text-properties officeooo:rsid="0084bee8"/>
    </style:style>
    <style:style style:name="T39" style:family="text">
      <style:text-properties officeooo:rsid="005c1fe6"/>
    </style:style>
    <style:style style:name="T40" style:family="text">
      <style:text-properties officeooo:rsid="004f1538"/>
    </style:style>
    <style:style style:name="T41" style:family="text">
      <style:text-properties officeooo:rsid="005d6d04"/>
    </style:style>
    <style:style style:name="T42" style:family="text">
      <style:text-properties officeooo:rsid="00522889"/>
    </style:style>
    <style:style style:name="T43" style:family="text">
      <style:text-properties officeooo:rsid="005156ec"/>
    </style:style>
    <style:style style:name="T44" style:family="text">
      <style:text-properties officeooo:rsid="0053c834"/>
    </style:style>
    <style:style style:name="T45" style:family="text">
      <style:text-properties officeooo:rsid="0054012a"/>
    </style:style>
    <style:style style:name="T46" style:family="text">
      <style:text-properties officeooo:rsid="004bfc08"/>
    </style:style>
    <style:style style:name="T47" style:family="text">
      <style:text-properties officeooo:rsid="004cabc1"/>
    </style:style>
    <style:style style:name="T48" style:family="text">
      <style:text-properties officeooo:rsid="004d91fe"/>
    </style:style>
    <style:style style:name="T49" style:family="text">
      <style:text-properties officeooo:rsid="00616deb"/>
    </style:style>
    <style:style style:name="T50" style:family="text">
      <style:text-properties officeooo:rsid="0081e709"/>
    </style:style>
    <style:style style:name="T51" style:family="text">
      <style:text-properties officeooo:rsid="008270ab"/>
    </style:style>
    <style:style style:name="T52" style:family="text">
      <style:text-properties officeooo:rsid="0083bf8a"/>
    </style:style>
    <style:style style:name="T5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9479a9"/>
    </style:style>
    <style:style style:name="T55" style:family="text">
      <style:text-properties officeooo:rsid="0098169f"/>
    </style:style>
    <style:style style:name="T56" style:family="text">
      <style:text-properties officeooo:rsid="009fae79"/>
    </style:style>
    <style:style style:name="T57" style:family="text">
      <style:text-properties officeooo:rsid="00964f33"/>
    </style:style>
    <style:style style:name="T58" style:family="text">
      <style:text-properties officeooo:rsid="009900cf"/>
    </style:style>
    <style:style style:name="T59" style:family="text">
      <style:text-properties officeooo:rsid="00a1908c"/>
    </style:style>
    <style:style style:name="T60" style:family="text">
      <style:text-properties officeooo:rsid="00a3835b"/>
    </style:style>
    <style:style style:name="T61" style:family="text">
      <style:text-properties officeooo:rsid="00af2f77"/>
    </style:style>
    <style:style style:name="T62" style:family="text">
      <style:text-properties fo:color="#127622" loext:opacity="100%" officeooo:rsid="006e4185"/>
    </style:style>
    <style:style style:name="T63" style:family="text">
      <style:text-properties officeooo:rsid="006e4185"/>
    </style:style>
    <style:style style:name="T64" style:family="text">
      <style:text-properties fo:color="#ff0000" loext:opacity="100%" fo:font-style="italic" officeooo:rsid="006ec7f3" style:font-style-asian="italic" style:font-style-complex="italic"/>
    </style:style>
    <style:style style:name="T65" style:family="text">
      <style:text-properties officeooo:rsid="006ec7f3"/>
    </style:style>
    <style:style style:name="T66" style:family="text">
      <style:text-properties fo:color="#127622" loext:opacity="100%" officeooo:rsid="0071c617"/>
    </style:style>
    <style:style style:name="T67" style:family="text">
      <style:text-properties fo:color="#127622" loext:opacity="100%" officeooo:rsid="0070592c"/>
    </style:style>
    <style:style style:name="T68" style:family="text">
      <style:text-properties officeooo:rsid="008d6b11"/>
    </style:style>
    <style:style style:name="T6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color="#127622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71" style:family="text">
      <style:text-properties officeooo:rsid="00742b74"/>
    </style:style>
    <style:style style:name="T72" style:family="text">
      <style:text-properties officeooo:rsid="009e2691"/>
    </style:style>
    <style:style style:name="T73" style:family="text">
      <style:text-properties officeooo:rsid="008df426"/>
    </style:style>
    <style:style style:name="T74" style:family="text">
      <style:text-properties officeooo:rsid="008e730f"/>
    </style:style>
    <style:style style:name="T75" style:family="text">
      <style:text-properties fo:color="#127622" loext:opacity="100%" officeooo:rsid="008df426"/>
    </style:style>
    <style:style style:name="T76" style:family="text">
      <style:text-properties officeooo:rsid="00785498"/>
    </style:style>
    <style:style style:name="T77" style:family="text">
      <style:text-properties officeooo:rsid="007b62ab"/>
    </style:style>
    <style:style style:name="T78" style:family="text">
      <style:text-properties officeooo:rsid="00bab088"/>
    </style:style>
    <style:style style:name="T79" style:family="text">
      <style:text-properties officeooo:rsid="00b1ca7a"/>
    </style:style>
    <style:style style:name="T80" style:family="text">
      <style:text-properties style:font-name="Liberation Sans" fo:font-size="12pt" fo:font-weight="normal" officeooo:rsid="00a3bd88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font-weight="normal" officeooo:rsid="00a5e336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b247b7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normal" officeooo:rsid="00b81677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font-weight="normal" officeooo:rsid="00b1ca7a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font-weight="normal" officeooo:rsid="00b21e47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font-weight="normal" officeooo:rsid="00b270a8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font-weight="normal" officeooo:rsid="00b933e0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font-weight="normal" officeooo:rsid="00a5b7d1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font-weight="normal" officeooo:rsid="00a427cf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aaf1a5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font-weight="normal" officeooo:rsid="00a74937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font-weight="normal" officeooo:rsid="00b623c4" style:font-size-asian="12pt" style:font-weight-asian="normal" style:font-size-complex="12pt" style:font-weight-complex="normal"/>
    </style:style>
    <style:style style:name="T94" style:family="text">
      <style:text-properties fo:color="#127622" loext:opacity="100%"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5" style:family="text">
      <style:text-properties fo:color="#127622" loext:opacity="100%" style:font-name="Liberation Sans" fo:font-size="12pt" fo:font-weight="normal" officeooo:rsid="00ab835b" style:font-size-asian="12pt" style:font-weight-asian="normal" style:font-size-complex="12pt" style:font-weight-complex="normal"/>
    </style:style>
    <style:style style:name="T96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n coinage notes</text:p>
      <text:p text:style-name="P2"/>
      <text:p text:style-name="P2">Early republic</text:p>
      <text:list text:style-name="L1">
        <text:list-item>
          <text:p text:style-name="P3">When the denarius <text:span text:style-name="T1">(silver penny) </text:span>was first introduced around 211BC it was designated to be worth 10 copper asses (the Latin name for the <text:span text:style-name="T2">Greek </text:span>assarion) <text:span text:style-name="T3">(1/10 assarion = 1 denari</text:span><text:span text:style-name="T4">us</text:span><text:span text:style-name="T3">).</text:span></text:p>
        </text:list-item>
        <text:list-item>
          <text:p text:style-name="P4">The Latin <text:span text:style-name="T5">deni</text:span><text:span text:style-name="T6"> means “containing ten”.</text:span></text:p>
        </text:list-item>
      </text:list>
      <text:p text:style-name="P5">Retariffing of 141 BC</text:p>
      <text:list text:style-name="L2">
        <text:list-item>
          <text:p text:style-name="P6">To account for the decreasing value of the copper used in the as<text:span text:style-name="T7">sarion</text:span>, they changed the value of a denarius to be 16 as (1/16 assarion = 1 denarius).</text:p>
        </text:list-item>
      </text:list>
      <text:p text:style-name="Text_20_body"/>
      <text:p text:style-name="P7">In “modern” coin systems we typically only have <text:span text:style-name="T8">one </text:span>base coin that represents “the smallest thing you can buy something with” (eg. <text:span text:style-name="T9">our</text:span> penny). <text:span text:style-name="T10">However, the Roman coin system </text:span><text:span text:style-name="T11">was a little different.</text:span>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The Assarion (the “working” coin)</text:p>
          </table:table-cell>
          <table:table-cell table:style-name="Table5.B1" office:value-type="string">
            <text:p text:style-name="P8">Main coin for daily staples like the sparrows. Standard unit for marketplace transactions.</text:p>
          </table:table-cell>
        </table:table-row>
        <table:table-row>
          <table:table-cell table:style-name="Table5.A2" office:value-type="string">
            <text:p text:style-name="P8">The <text:span text:style-name="T12">K</text:span>odrantes (the “legal” minimum)</text:p>
          </table:table-cell>
          <table:table-cell table:style-name="Table5.B2" office:value-type="string">
            <text:p text:style-name="P8">The Roman <text:span text:style-name="T5">quadrans</text:span>. Often used to pay for very cheap, state-regulated services (eg. entrance fee for a public bath). Its value was ¼ assarion.</text:p>
          </table:table-cell>
        </table:table-row>
        <table:table-row>
          <table:table-cell table:style-name="Table5.A2" office:value-type="string">
            <text:p text:style-name="P9">The Mite <text:span text:style-name="T13">(the “local” coin)</text:span></text:p>
          </table:table-cell>
          <table:table-cell table:style-name="Table5.B2" office:value-type="string">
            <text:p text:style-name="P10">The <text:span text:style-name="T5">lepton</text:span> was a Jewish coin. <text:span text:style-name="T14">Its value was ½ of the Kodrantes (1/8 </text:span><text:span text:style-name="T15">a</text:span><text:span text:style-name="T14">ssarion, </text:span><text:span text:style-name="T15">1/128 denarius</text:span><text:span text:style-name="T14">).</text:span></text:p>
          </table:table-cell>
        </table:table-row>
      </table:table>
      <text:p text:style-name="P7"/>
      <text:p text:style-name="Text_20_body"><text:span text:style-name="T16">This was also part of why moneychangers existed (currency exchange): </text:span><text:span text:style-name="T17">Mat 21:12</text:span><text:span text:style-name="T16">, </text:span><text:span text:style-name="T17">Mat 25:27</text:span><text:span text:style-name="T16">, </text:span><text:span text:style-name="T17">Mar 11:15</text:span><text:span text:style-name="T16">, </text:span><text:span text:style-name="T17">Joh 2:14,15</text:span><text:span text:style-name="T16">. </text:span><text:span text:style-name="T18">Roman coins were </text:span><text:span text:style-name="T19">considered </text:span><text:span text:style-name="T18">idolatrous and their use was strictly forbidden at the temple. </text:span><text:span text:style-name="T20">So, while you earned your wages </text:span><text:span text:style-name="T21">in Roman</text:span><text:span text:style-name="T22"> penny/pence per day</text:span><text:span text:style-name="T20"> (denarius G1220), you would need to exchange that for the silver temple shekel </text:span><text:span text:style-name="T23">for example for the yearly temple tax </text:span><text:span text:style-name="T20">(</text:span><text:span text:style-name="T24">½ shekel per person, per year </text:span><text:span text:style-name="T25">except during </text:span><text:span text:style-name="T26">Nehemiah 10:32</text:span>’s time<text:span text:style-name="T24">; </text:span><text:span text:style-name="T27">the yearly temple tax </text:span><text:span text:style-name="T28">is not</text:span><text:span text:style-name="T27"> a commandment in the Law; </text:span><text:span text:style-name="T21">Being Son of the King, Jesus was exempt from paying such a tax regardless of it’s origin. It appears that He</text:span><text:span text:style-name="T27"> paid it anyway to avoid offending them </text:span><text:span text:style-name="T21">but where did the money really come from?</text:span><text:span text:style-name="T27"> </text:span><text:span text:style-name="T29">Matthew 17:24-27</text:span><text:span text:style-name="T20">)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30">Matthew 10:29</text:span><text:line-break/>Are not <text:span text:style-name="T31">two sparrows</text:span> sold for <text:span text:style-name="T31">a farthing</text:span>? and one of them shall not fall on the ground without your Father.</text:p>
          </table:table-cell>
          <table:table-cell table:style-name="Table1.B1" office:value-type="string">
            <text:p text:style-name="P12">G787 (assarion) <text:span text:style-name="T32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Luke 12:6</text:span><text:line-break/>Are not <text:span text:style-name="T31">five sparrows</text:span> sold for <text:span text:style-name="T31">two farthings</text:span>, and not one of them is forgotten before God?</text:p>
          </table:table-cell>
          <table:table-cell table:style-name="Table1.B2" office:value-type="string">
            <text:p text:style-name="P13">G787 (assarion) <text:span text:style-name="T34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Matthew 5:26</text:span><text:line-break/>Verily I say unto thee, Thou shalt by no means come out thence, till thou hast paid the uttermost <text:span text:style-name="T31">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  <table:table-row>
          <table:table-cell table:style-name="Table1.A4" office:value-type="string">
            <text:p text:style-name="Table_20_Contents"><text:span text:style-name="T30">Mark 12:42</text:span><text:line-break/>And there came a certain poor widow, and she threw in <text:span text:style-name="T31">two mites</text:span>, which make <text:span text:style-name="T31">a 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</table:table>
      <text:p text:style-name="Standard"/>
      <text:p text:style-name="P15"><text:span text:style-name="T36">Matthew 10:29</text:span><text:span text:style-name="T37"> and </text:span><text:span text:style-name="T36">Luke 12:6</text:span><text:span text:style-name="T37"> </text:span><text:span text:style-name="T38">might </text:span><text:span text:style-name="T37">seem like they are describing a </text:span><text:span text:style-name="T39">different value </text:span><text:span text:style-name="T37">farthing </text:span><text:span text:style-name="T40">but they both use the same exact coin </text:span><text:span text:style-name="T37">(</text:span><text:span text:style-name="T41">the </text:span><text:span text:style-name="T37">assarion)</text:span><text:span text:style-name="T40">. Therefore, instead of being two different ratios </text:span><text:span text:style-name="T42">for the same coin </text:span><text:span text:style-name="T43">it is more likely that </text:span><text:span text:style-name="T40">the merchant </text:span><text:span text:style-name="T44">offered</text:span><text:span text:style-name="T40"> a bulk discount </text:span><text:span text:style-name="T45">by </text:span><text:span text:style-name="T40">including an extra sparrow for free. </text:span><text:span text:style-name="T46">Ignoring bulk discounts, one could purchase 32 sparrows for 1 Roman </text:span><text:span text:style-name="T47">silver </text:span><text:span text:style-name="T48">penny (</text:span><text:span text:style-name="T49">1 </text:span><text:span text:style-name="T48">denarius)</text:span><text:span text:style-name="T46">.</text:span></text:p>
      <text:p text:style-name="P16"/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8">1 Denarius (penny/<text:span text:style-name="T50">pence</text:span>)</text:p>
          </table:table-cell>
          <table:table-cell table:style-name="Table2.B1" office:value-type="string">
            <text:p text:style-name="P18">16 <text:span text:style-name="T51">As</text:span><text:span text:style-name="T52">sarion</text:span> (<text:span text:style-name="T30">Mat 10</text:span>/<text:span text:style-name="T30">Luk 12</text:span> farthing)</text:p>
          </table:table-cell>
        </table:table-row>
        <table:table-row>
          <table:table-cell table:style-name="Table2.A2" office:value-type="string">
            <text:p text:style-name="P18">1 <text:span text:style-name="T52">As</text:span></text:p>
          </table:table-cell>
          <table:table-cell table:style-name="Table2.B2" office:value-type="string">
            <text:p text:style-name="P18">4 <text:span text:style-name="T51">Quadrans</text:span> (<text:span text:style-name="T30">Mar 12</text:span>/<text:span text:style-name="T30">Mat 5</text:span> farthing)</text:p>
          </table:table-cell>
        </table:table-row>
        <table:table-row>
          <table:table-cell table:style-name="Table2.A2" office:value-type="string">
            <text:p text:style-name="P19">1 <text:span text:style-name="T52">Quadran</text:span> (kodrantes)</text:p>
          </table:table-cell>
          <table:table-cell table:style-name="Table2.B2" office:value-type="string">
            <text:p text:style-name="P19">2 <text:span text:style-name="T52">Lepta</text:span> (mites)</text:p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1"><text:span text:style-name="Strong_20_Emphasis"><text:span text:style-name="T53">Coin Name</text:span></text:span></text:p>
            </table:table-cell>
            <table:table-cell table:style-name="Table3.A1" office:value-type="string">
              <text:p text:style-name="P21"><text:span text:style-name="Strong_20_Emphasis"><text:span text:style-name="T53">Typical Use / Purpose</text:span></text:span></text:p>
            </table:table-cell>
            <table:table-cell table:style-name="Table3.A1" office:value-type="string">
              <text:p text:style-name="P21"><text:span text:style-name="Strong_20_Emphasis"><text:span text:style-name="T53">Metal</text:span></text:span></text:p>
            </table:table-cell>
            <table:table-cell table:style-name="Table3.A1" office:value-type="string">
              <text:p text:style-name="P21"><text:span text:style-name="Strong_20_Emphasis"><text:span text:style-name="T53">Value vs. Denarius</text:span></text:span></text:p>
            </table:table-cell>
            <table:table-cell table:style-name="Table3.E1" office:value-type="string">
              <text:p text:style-name="P21"><text:span text:style-name="Strong_20_Emphasis"><text:span text:style-name="T53">Qty per Denariu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22">Aureus</text:p>
            <text:p text:style-name="P22"><text:span text:style-name="T54">(</text:span><text:span text:style-name="T55">English </text:span><text:span text:style-name="T54">Dram; </text:span><text:span text:style-name="T55">Hebrew </text:span><text:span text:style-name="T54">Adarkon/</text:span><text:span text:style-name="T56">Darkemon</text:span><text:span text:style-name="T54">; </text:span><text:span text:style-name="T55">Persian </text:span><text:span text:style-name="T54">Daric)</text:span></text:p>
          </table:table-cell>
          <table:table-cell table:style-name="Table3.A2" office:value-type="string">
            <text:p text:style-name="P23"><text:span text:style-name="T30">Mat 10:9</text:span>; <text:span text:style-name="T57">~8.4g; </text:span><text:span text:style-name="T58">state-level wealth, international trade, temple treasures; </text:span><text:span text:style-name="T59">An English dram is 1/8 of an ounce ~3.</text:span><text:span text:style-name="T60">88</text:span><text:span text:style-name="T59">g.</text:span></text:p>
          </table:table-cell>
          <table:table-cell table:style-name="Table3.A2" office:value-type="string">
            <text:p text:style-name="P24">Gold</text:p>
          </table:table-cell>
          <table:table-cell table:style-name="Table3.A2" office:value-type="string">
            <text:p text:style-name="P25">25x</text:p>
          </table:table-cell>
          <table:table-cell table:style-name="Table3.E2" office:value-type="string">
            <text:p text:style-name="P25">1/25</text:p>
          </table:table-cell>
        </table:table-row>
        <table:table-row>
          <table:table-cell table:style-name="Table3.A2" office:value-type="string">
            <text:p text:style-name="P26"><text:span text:style-name="T61">(Tyiran) </text:span>Shekel <text:span text:style-name="T61">(94%+ silver purity)</text:span></text:p>
          </table:table-cell>
          <table:table-cell table:style-name="Table3.A2" office:value-type="string">
            <text:p text:style-name="P26">Temple Tax (for 2 people): The only silver accepted in the Temple. <text:span text:style-name="T62">Matthew 17:27</text:span><text:span text:style-name="T63"> “</text:span><text:span text:style-name="T64">for me and thee</text:span><text:span text:style-name="T65">” </text:span><text:span text:style-name="T63">(1 stater/statera G4715 = 2 didrachmae G1323 = 1 Shekel)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4x</text:p>
          </table:table-cell>
          <table:table-cell table:style-name="Table3.E2" office:value-type="string">
            <text:p text:style-name="P28">1/4</text:p>
          </table:table-cell>
        </table:table-row>
        <table:table-row>
          <table:table-cell table:style-name="Table3.A2" office:value-type="string">
            <text:p text:style-name="P26">Bekah</text:p>
          </table:table-cell>
          <table:table-cell table:style-name="Table3.A2" office:value-type="string">
            <text:p text:style-name="P26">Temple Tax (for 1 person): The annual "tribute" per male (<text:span text:style-name="T30">Ex</text:span><text:span text:style-name="T66">o</text:span><text:span text:style-name="T30"> 3</text:span><text:span text:style-name="T67">8</text:span><text:span text:style-name="T30">:</text:span><text:span text:style-name="T67">26</text:span>).</text:p>
            <text:p text:style-name="P26"/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2x</text:p>
          </table:table-cell>
          <table:table-cell table:style-name="Table3.E2" office:value-type="string">
            <text:p text:style-name="P28">1/2</text:p>
          </table:table-cell>
        </table:table-row>
        <table:table-row>
          <table:table-cell table:style-name="Table3.A2" office:value-type="string">
            <text:p text:style-name="P29">Denarius</text:p>
            <text:p text:style-name="P30">(~80% silver purity)</text:p>
            <text:p text:style-name="P29">(Penny; <text:span text:style-name="T68">Latin</text:span>)</text:p>
            <text:p text:style-name="P29"/>
            <text:p text:style-name="P29">G1220 / G694</text:p>
          </table:table-cell>
          <table:table-cell table:style-name="Table3.A2" office:value-type="string">
            <text:p text:style-name="Table_20_Contents"><text:span text:style-name="T69">Standard Day's Wage: Payment for a laborer or soldier (</text:span><text:span text:style-name="T70">Mat 20:2</text:span> <text:span text:style-name="T71">a penny = a denarius</text:span><text:span text:style-name="T69">).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8">1</text:p>
          </table:table-cell>
          <table:table-cell table:style-name="Table3.E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31">Drachma</text:p>
            <text:p text:style-name="P31">(<text:span text:style-name="T72">Greece</text:span>)</text:p>
            <text:p text:style-name="P31"/>
            <text:p text:style-name="P31">G1406 / G694</text:p>
          </table:table-cell>
          <table:table-cell table:style-name="Table3.A2" office:value-type="string">
            <text:p text:style-name="P32"><text:span text:style-name="T30">Mat 20:2</text:span> <text:span text:style-name="T73">(</text:span><text:span text:style-name="T74">Denarius</text:span><text:span text:style-name="T73">)</text:span>, <text:span text:style-name="T75">Luke 15:8</text:span><text:span text:style-name="T73"> (drachma)</text:span></text:p>
          </table:table-cell>
          <table:table-cell table:style-name="Table3.A2" office:value-type="string">
            <text:p text:style-name="P33">Silver</text:p>
          </table:table-cell>
          <table:table-cell table:style-name="Table3.A2" office:value-type="string">
            <text:p text:style-name="P34">1</text:p>
          </table:table-cell>
          <table:table-cell table:style-name="Table3.E2" office:value-type="string">
            <text:p text:style-name="P34">1</text:p>
          </table:table-cell>
        </table:table-row>
        <table:table-row>
          <table:table-cell table:style-name="Table3.A2" office:value-type="string">
            <text:p text:style-name="P29">Assarion</text:p>
            <text:p text:style-name="P29">(Farthing)</text:p>
          </table:table-cell>
          <table:table-cell table:style-name="Table3.A2" office:value-type="string">
            <text:p text:style-name="P26">Small Grocery Purchase: Bought two sparrows in the market (<text:span text:style-name="T30">Mat 10:29</text:span>).</text:p>
          </table:table-cell>
          <table:table-cell table:style-name="Table3.A2" office:value-type="string">
            <text:p text:style-name="P26">Copper</text:p>
          </table:table-cell>
          <table:table-cell table:style-name="Table3.A2" office:value-type="string">
            <text:p text:style-name="P28">1/16</text:p>
          </table:table-cell>
          <table:table-cell table:style-name="Table3.E2" office:value-type="string">
            <text:p text:style-name="P28">16</text:p>
          </table:table-cell>
        </table:table-row>
        <table:table-row>
          <table:table-cell table:style-name="Table3.A2" office:value-type="string">
            <text:p text:style-name="P29">Kodrantes</text:p>
            <text:p text:style-name="P29">(Farthing)</text:p>
          </table:table-cell>
          <table:table-cell table:style-name="Table3.A2" office:value-type="string">
            <text:p text:style-name="Table_20_Contents"><text:span text:style-name="T69">State Fees: Admission to public baths or very minor civil fines (</text:span><text:span text:style-name="T70">Mat 5:26</text:span> kodrantes/<text:span text:style-name="T76">quadran;</text:span> 1/64th denarius<text:span text:style-name="T69">).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6">Prutah</text:p>
          </table:table-cell>
          <table:table-cell table:style-name="Table3.A2" office:value-type="string">
            <text:p text:style-name="P26">Common Market Change: The standard "pocket change" for Judeans. <text:span text:style-name="T77">(Mishnah Kiddushin 1:1; 1 perutah/prutah = 1/8 issar (assarion) = 1/128 denarius)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9">Lepton</text:p>
            <text:p text:style-name="P29">(Mite)</text:p>
            <text:p text:style-name="P29"/>
            <text:p text:style-name="P29">G3016</text:p>
          </table:table-cell>
          <table:table-cell table:style-name="Table3.A2" office:value-type="string">
            <text:p text:style-name="P26">The "Widow's Offering" (<text:span text:style-name="T30">Mar 12:42</text:span>).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128</text:p>
          </table:table-cell>
          <table:table-cell table:style-name="Table3.E2" office:value-type="string">
            <text:p text:style-name="P28">128</text:p>
          </table:table-cell>
        </table:table-row>
      </table:table>
      <text:p text:style-name="P35"/>
      <text:p text:style-name="P35"/>
      <text:p text:style-name="P35"/>
      <text:p text:style-name="P35"/>
      <text:p text:style-name="P36"><text:soft-page-break/>When one went to the temple to purchase an animal to sacrifice it was a multi-step, costly, monopolistic system to navigate which severely reduced purchasing power <text:span text:style-name="T78">and brought in substantial money for the exchangers, inspectors, and animal peddlers for very little effort</text:span>:</text:p>
      <text:p text:style-name="P36"/>
      <text:list xml:id="list1682434295" text:style-name="L3">
        <text:list-item>
          <text:p text:style-name="P37">They had to first exchange their currency to the <text:span text:style-name="T79">more (silver) pure </text:span>“Tyrian Shekel” (temple shekel).</text:p>
        </text:list-item>
      </text:list>
      <text:list text:style-name="L4">
        <text:list-item>
          <text:list>
            <text:list-item>
              <text:p text:style-name="P38"><text:span text:style-name="T80">The moneychangers charged a </text:span><text:span text:style-name="T81">fee</text:span><text:span text:style-name="T80"> </text:span><text:span text:style-name="T82">(Kolbon) </text:span><text:span text:style-name="T80">o</text:span><text:span text:style-name="T83">f </text:span><text:span text:style-name="T80">~</text:span><text:span text:style-name="T84">5</text:span><text:span text:style-name="T80">-10% </text:span><text:span text:style-name="T85">(</text:span><text:span text:style-name="T86">~</text:span><text:span text:style-name="T85">½ </text:span><text:span text:style-name="T87">to</text:span><text:span text:style-name="T85"> 1 days wage).</text:span></text:p>
            </text:list-item>
          </text:list>
        </text:list-item>
      </text:list>
      <text:list text:continue-list="list1682434295" text:style-name="L3">
        <text:list-item>
          <text:p text:style-name="P39">If you brought your own animal sacrifice there was an inspection fee charged to see if the animal had any blemishes.</text:p>
        </text:list-item>
      </text:list>
      <text:list text:style-name="L5">
        <text:list-item>
          <text:list>
            <text:list-item>
              <text:p text:style-name="P40">If your animal failed the inspection you had to purchase one from the sellers at the temple who were often the same people performing the inspections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1">Animals that were pre-screened (inspected) to be guaranteed blemish-free demanded a substantial markup from normal market values.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88">The</text:span><text:span text:style-name="T89"> mark-up prices ranged anywhere from 50%-</text:span><text:span text:style-name="T90">160% (oxen)</text:span><text:span text:style-name="T89"> to </text:span><text:span text:style-name="T91">300-</text:span><text:span text:style-name="T89">1500% </text:span><text:span text:style-name="T90">(doves)</text:span><text:span text:style-name="T92">.</text:span></text:p>
                      <text:list>
                        <text:list-item>
                          <text:p text:style-name="P42"><text:span text:style-name="T91">Notice </text:span><text:span text:style-name="T93">that</text:span><text:span text:style-name="T91"> the markup </text:span><text:span text:style-name="T93">prices </text:span><text:span text:style-name="T91">especially took advantage of the desperate poor (</text:span><text:span text:style-name="T94">Leviticus 5:7, </text:span><text:span text:style-name="T95">12:8, 14:21-22</text:span><text:span text:style-name="T91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1"><text:span text:style-name="Strong_20_Emphasis"><text:span text:style-name="T96">Sacrif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Rural Market Price (Pence/Denarii)</text:span></text:span></text:p>
            </table:table-cell>
            <table:table-cell table:style-name="Table4.A1" office:value-type="string">
              <text:p text:style-name="P21"><text:span text:style-name="Strong_20_Emphasis"><text:span text:style-name="T96">Temple "Certified" Pr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Estimated Markup (%)</text:span></text:span></text:p>
            </table:table-cell>
            <table:table-cell table:style-name="Table4.E1" office:value-type="string">
              <text:p text:style-name="P21"><text:span text:style-name="Strong_20_Emphasis"><text:span text:style-name="T96">Laborer's Wage Equivalent</text:span></text:span></text:p>
            </table:table-cell>
          </table:table-row>
        </table:table-header-rows>
        <table:table-row>
          <table:table-cell table:style-name="Table4.A2" office:value-type="string">
            <text:p text:style-name="P44">Pair of Doves</text:p>
          </table:table-cell>
          <table:table-cell table:style-name="Table4.A2" office:value-type="string">
            <text:p text:style-name="P44">~0.25 (1/4 Penny)</text:p>
          </table:table-cell>
          <table:table-cell table:style-name="Table4.A2" office:value-type="string">
            <text:p text:style-name="P44">1 – 4 Pence</text:p>
          </table:table-cell>
          <table:table-cell table:style-name="Table4.A2" office:value-type="string">
            <text:p text:style-name="P44">300% – 1500%</text:p>
          </table:table-cell>
          <table:table-cell table:style-name="Table4.E2" office:value-type="string">
            <text:p text:style-name="P44">1 to 4 Days of Labor</text:p>
          </table:table-cell>
        </table:table-row>
        <table:table-row>
          <table:table-cell table:style-name="Table4.A2" office:value-type="string">
            <text:p text:style-name="P44">Lamb / Kid</text:p>
          </table:table-cell>
          <table:table-cell table:style-name="Table4.A2" office:value-type="string">
            <text:p text:style-name="P44">4 – 8 Pence</text:p>
          </table:table-cell>
          <table:table-cell table:style-name="Table4.A2" office:value-type="string">
            <text:p text:style-name="P44">10 – 40 Pence</text:p>
          </table:table-cell>
          <table:table-cell table:style-name="Table4.A2" office:value-type="string">
            <text:p text:style-name="P44">150% – 400%</text:p>
          </table:table-cell>
          <table:table-cell table:style-name="Table4.E2" office:value-type="string">
            <text:p text:style-name="P44">2 Weeks to 1.5 Months</text:p>
          </table:table-cell>
        </table:table-row>
        <table:table-row>
          <table:table-cell table:style-name="Table4.A2" office:value-type="string">
            <text:p text:style-name="P44">Ram</text:p>
          </table:table-cell>
          <table:table-cell table:style-name="Table4.A2" office:value-type="string">
            <text:p text:style-name="P44">12 – 15 Pence</text:p>
          </table:table-cell>
          <table:table-cell table:style-name="Table4.A2" office:value-type="string">
            <text:p text:style-name="P44">30 – 80 Pence</text:p>
          </table:table-cell>
          <table:table-cell table:style-name="Table4.A2" office:value-type="string">
            <text:p text:style-name="P44">150% – 430%</text:p>
          </table:table-cell>
          <table:table-cell table:style-name="Table4.E2" office:value-type="string">
            <text:p text:style-name="P44">1 to 3 Months</text:p>
          </table:table-cell>
        </table:table-row>
        <table:table-row>
          <table:table-cell table:style-name="Table4.A2" office:value-type="string">
            <text:p text:style-name="P44">Young Bullock</text:p>
          </table:table-cell>
          <table:table-cell table:style-name="Table4.A2" office:value-type="string">
            <text:p text:style-name="P44">40 – 60 Pence</text:p>
          </table:table-cell>
          <table:table-cell table:style-name="Table4.A2" office:value-type="string">
            <text:p text:style-name="P44">75 – 200 Pence</text:p>
          </table:table-cell>
          <table:table-cell table:style-name="Table4.A2" office:value-type="string">
            <text:p text:style-name="P44">85% – 230%</text:p>
          </table:table-cell>
          <table:table-cell table:style-name="Table4.E2" office:value-type="string">
            <text:p text:style-name="P44">3 to 7 Months</text:p>
          </table:table-cell>
        </table:table-row>
        <table:table-row>
          <table:table-cell table:style-name="Table4.A2" office:value-type="string">
            <text:p text:style-name="P44">Full Ox</text:p>
          </table:table-cell>
          <table:table-cell table:style-name="Table4.A2" office:value-type="string">
            <text:p text:style-name="P44">100 – 150 Pence</text:p>
          </table:table-cell>
          <table:table-cell table:style-name="Table4.A2" office:value-type="string">
            <text:p text:style-name="P44">150 – 400+ Pence</text:p>
          </table:table-cell>
          <table:table-cell table:style-name="Table4.A2" office:value-type="string">
            <text:p text:style-name="P44">50% – 160%</text:p>
          </table:table-cell>
          <table:table-cell table:style-name="Table4.E2" office:value-type="string">
            <text:p text:style-name="P44">6 Months to 1+ Year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7:52:20.725986600</meta:creation-date>
    <dc:title>default</dc:title>
    <meta:editing-duration>PT6H14M23S</meta:editing-duration>
    <meta:editing-cycles>171</meta:editing-cycles>
    <meta:generator>LibreOffice/26.2.4.2$Linux_X86_64 LibreOffice_project/64a984c51f4702dbd3710b13428c673a2f1292e7</meta:generator>
    <dc:date>2026-07-11T12:30:00.235958822</dc:date>
    <meta:print-date>2026-04-28T10:17:37.032441100</meta:print-date>
    <meta:printed-by>PDF files</meta:printed-by>
    <meta:document-statistic meta:table-count="5" meta:image-count="0" meta:object-count="0" meta:page-count="3" meta:paragraph-count="127" meta:word-count="966" meta:character-count="5595" meta:non-whitespace-character-count="4754"/>
    <meta:template xlink:type="simple" xlink:actuate="onRequest" xlink:title="default" xlink:href="../../../../AppData/Roaming/LibreOffice/4/user/template/default1.ott" meta:date="2026-04-28T07:52:19.684662800"/>
  </office:meta>
</office:document-meta>
</file>