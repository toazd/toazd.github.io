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8.25in" fo:break-before="auto" fo:break-after="auto" table:align="center" style:may-break-between-rows="true"/>
    </style:style>
    <style:style style:name="Table4.A" style:family="table-column">
      <style:table-column-properties style:column-width="1.8194in"/>
    </style:style>
    <style:style style:name="Table4.B" style:family="table-column">
      <style:table-column-properties style:column-width="0.7306in"/>
    </style:style>
    <style:style style:name="Table4.C" style:family="table-column">
      <style:table-column-properties style:column-width="1.7625in"/>
    </style:style>
    <style:style style:name="Table4.D" style:family="table-column">
      <style:table-column-properties style:column-width="2.8264in"/>
    </style:style>
    <style:style style:name="Table4.E" style:family="table-column">
      <style:table-column-properties style:column-width="0.5021in"/>
    </style:style>
    <style:style style:name="Table4.F" style:family="table-column">
      <style:table-column-properties style:column-width="0.609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4.F1" style:family="table-cell">
      <style:table-cell-properties style:vertical-align="middle" fo:padding="0.0382in" fo:border="0.75pt solid #000000"/>
    </style:style>
    <style:style style:name="Table4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4.F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1" style:family="table">
      <style:table-properties style:width="8.2201in" table:align="center" style:shadow="#808080 0.0403in 0.0403in"/>
    </style:style>
    <style:style style:name="Table11.A" style:family="table-column">
      <style:table-column-properties style:column-width="8.2201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="0.75pt solid #000000"/>
    </style:style>
    <style:style style:name="Table11.A2" style:family="table-cell">
      <style:table-cell-properties fo:padding="0.0382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Gabriela Nerd Font" officeooo:rsid="0027b176" officeooo:paragraph-rsid="0027b17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562356" officeooo:paragraph-rsid="0056235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df0c93" officeooo:paragraph-rsid="00df0c9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ca4bd" officeooo:paragraph-rsid="005ca4b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14678d6" officeooo:paragraph-rsid="014678d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ca4bd" officeooo:paragraph-rsid="014678d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655dd1" officeooo:paragraph-rsid="00655dd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62356" officeooo:paragraph-rsid="0056235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ebdd87" officeooo:paragraph-rsid="00edc5f8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alaxie Unicode Hebrew" fo:font-size="12pt" officeooo:rsid="0057ed28" officeooo:paragraph-rsid="00dc94e9" style:font-size-asian="12pt" style:font-name-complex="Galaxie Unicode Hebrew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57ed28" officeooo:paragraph-rsid="00dc94e9" style:font-size-asian="12pt" style:font-name-complex="Galaxie Unicode Hebrew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948fef" officeooo:paragraph-rsid="00948fef" style:font-size-asian="12pt" style:font-name-complex="Galaxie Unicode Hebrew" style:font-size-complex="12pt"/>
    </style:style>
    <style:style style:name="P13" style:family="paragraph" style:parent-style-name="Table_20_Contents">
      <style:paragraph-properties fo:text-align="left" style:justify-single-word="false"/>
      <style:text-properties style:font-name="Liberation Sans" fo:font-size="12pt" officeooo:rsid="0097a95b" officeooo:paragraph-rsid="0097a95b" style:font-size-asian="12pt" style:font-name-complex="Galaxie Unicode Hebrew" style:font-size-complex="12pt"/>
    </style:style>
    <style:style style:name="P14" style:family="paragraph" style:parent-style-name="Table_20_Contents">
      <style:paragraph-properties fo:text-align="left" style:justify-single-word="false"/>
      <style:text-properties style:font-name="Liberation Sans" fo:font-size="12pt" officeooo:rsid="00984e25" officeooo:paragraph-rsid="00984e25" style:font-size-asian="12pt" style:font-name-complex="Galaxie Unicode Hebrew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581c79" officeooo:paragraph-rsid="00581c7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ebdd87" officeooo:paragraph-rsid="00ebdd8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Galaxie Unicode Hebrew" fo:font-size="12pt" officeooo:rsid="0057ed28" officeooo:paragraph-rsid="0057ed28" style:font-size-asian="12pt" style:font-name-complex="Galaxie Unicode Hebrew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6003b7" officeooo:paragraph-rsid="006003b7" style:font-size-asian="12pt" style:font-name-complex="Galaxie Unicode Hebrew" style:font-size-complex="12pt"/>
    </style:style>
    <style:style style:name="P19" style:family="paragraph" style:parent-style-name="Table_20_Contents">
      <style:paragraph-properties fo:text-align="left" style:justify-single-word="false"/>
      <style:text-properties style:font-name="Liberation Sans" fo:font-size="12pt" officeooo:rsid="0125b651" officeooo:paragraph-rsid="0125b651" style:font-size-asian="12pt" style:font-name-complex="Galaxie Unicode Hebrew" style:font-size-complex="12pt"/>
    </style:style>
    <style:style style:name="P20" style:family="paragraph" style:parent-style-name="Table_20_Contents">
      <style:paragraph-properties fo:text-align="left" style:justify-single-word="false"/>
      <style:text-properties style:font-name="Liberation Sans" fo:font-size="12pt" officeooo:rsid="006eb748" officeooo:paragraph-rsid="006eb748" style:font-size-asian="12pt" style:font-name-complex="Galaxie Unicode Hebr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915440" officeooo:paragraph-rsid="00915440" style:font-size-asian="12pt" style:font-name-complex="Galaxie Unicode Hebrew" style:font-size-complex="12pt"/>
    </style:style>
    <style:style style:name="P22" style:family="paragraph" style:parent-style-name="Table_20_Contents">
      <style:paragraph-properties fo:text-align="left" style:justify-single-word="false"/>
      <style:text-properties style:font-name="Liberation Sans" fo:font-size="12pt" officeooo:rsid="009d2836" officeooo:paragraph-rsid="009d2836" style:font-size-asian="12pt" style:font-name-complex="Galaxie Unicode Hebrew" style:font-size-complex="12pt"/>
    </style:style>
    <style:style style:name="P23" style:family="paragraph" style:parent-style-name="Table_20_Contents">
      <style:paragraph-properties fo:text-align="left" style:justify-single-word="false"/>
      <style:text-properties style:font-name="Liberation Sans" fo:font-size="12pt" officeooo:rsid="009d81dc" officeooo:paragraph-rsid="009d81dc" style:font-size-asian="12pt" style:font-name-complex="Galaxie Unicode Hebrew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rsid="005ca4bd" officeooo:paragraph-rsid="005ca4bd" style:font-size-asian="12pt" style:font-name-complex="Galaxie Unicode Hebrew" style:font-size-complex="12pt"/>
    </style:style>
    <style:style style:name="P25" style:family="paragraph" style:parent-style-name="Table_20_Contents">
      <style:paragraph-properties fo:text-align="left" style:justify-single-word="false"/>
      <style:text-properties style:font-name="Liberation Sans" fo:font-size="12pt" officeooo:rsid="01281fd7" officeooo:paragraph-rsid="01281fd7" style:font-size-asian="12pt" style:font-name-complex="Galaxie Unicode Hebrew" style:font-size-complex="12pt"/>
    </style:style>
    <style:style style:name="P26" style:family="paragraph" style:parent-style-name="Table_20_Contents">
      <style:paragraph-properties fo:text-align="left" style:justify-single-word="false"/>
      <style:text-properties style:font-name="Liberation Sans" fo:font-size="12pt" officeooo:rsid="0071d53d" officeooo:paragraph-rsid="0071d53d" style:font-size-asian="12pt" style:font-name-complex="Galaxie Unicode Hebrew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Galaxie Unicode Hebrew" fo:font-size="12pt" officeooo:rsid="00581c79" officeooo:paragraph-rsid="00581c79" style:font-size-asian="12pt" style:font-name-complex="Galaxie Unicode Hebrew" style:font-size-complex="12pt"/>
    </style:style>
    <style:style style:name="P28" style:family="paragraph" style:parent-style-name="Table_20_Contents">
      <style:paragraph-properties fo:text-align="left" style:justify-single-word="false"/>
      <style:text-properties style:font-name="Liberation Sans" fo:font-size="12pt" officeooo:rsid="005ca4bd" officeooo:paragraph-rsid="005ca4bd" style:font-size-asian="12pt" style:font-name-complex="Galaxie Unicode Hebrew" style:font-size-complex="12pt"/>
    </style:style>
    <style:style style:name="P29" style:family="paragraph" style:parent-style-name="Table_20_Contents">
      <style:paragraph-properties fo:text-align="left" style:justify-single-word="false"/>
      <style:text-properties style:font-name="Liberation Sans" fo:font-size="12pt" officeooo:rsid="00784023" officeooo:paragraph-rsid="00784023" style:font-size-asian="12pt" style:font-name-complex="Galaxie Unicode Hebrew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officeooo:rsid="0059a002" officeooo:paragraph-rsid="0059a00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officeooo:rsid="00581c79" officeooo:paragraph-rsid="00581c79" style:font-size-asian="12pt" style:font-name-complex="Galaxie Unicode Hebrew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officeooo:rsid="01479edf" officeooo:paragraph-rsid="01479edf" style:font-size-asian="12pt" style:font-name-complex="Galaxie Unicode Hebrew" style:font-size-complex="12pt"/>
    </style:style>
    <style:style style:name="P33" style:family="paragraph" style:parent-style-name="Table_20_Contents">
      <style:paragraph-properties fo:text-align="left" style:justify-single-word="false"/>
      <style:text-properties style:font-name="Liberation Sans" fo:font-size="12pt" officeooo:rsid="01479edf" officeooo:paragraph-rsid="01479edf" style:font-size-asian="12pt" style:font-name-complex="Galaxie Unicode Hebrew" style:font-size-complex="12pt"/>
    </style:style>
    <style:style style:name="P34" style:family="paragraph" style:parent-style-name="Table_20_Contents">
      <style:paragraph-properties fo:text-align="left" style:justify-single-word="false"/>
      <style:text-properties style:font-name="Liberation Sans" fo:font-size="12pt" officeooo:rsid="014934f5" officeooo:paragraph-rsid="014934f5" style:font-size-asian="12pt" style:font-name-complex="Galaxie Unicode Hebrew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officeooo:rsid="01479edf" officeooo:paragraph-rsid="01479ed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Galaxie Unicode Hebrew" fo:font-size="12pt" officeooo:rsid="0059a002" officeooo:paragraph-rsid="0059a002" style:font-size-asian="12pt" style:font-name-complex="Galaxie Unicode Hebrew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officeooo:rsid="008e8985" officeooo:paragraph-rsid="008e8985" style:font-size-asian="12pt" style:font-name-complex="Galaxie Unicode Hebrew" style:font-size-complex="12pt"/>
    </style:style>
    <style:style style:name="P38" style:family="paragraph" style:parent-style-name="Table_20_Contents">
      <style:paragraph-properties fo:text-align="left" style:justify-single-word="false"/>
      <style:text-properties style:font-name="Liberation Sans" fo:font-size="12pt" officeooo:rsid="00a94a38" officeooo:paragraph-rsid="00a94a38" style:font-size-asian="12pt" style:font-name-complex="Galaxie Unicode Hebrew" style:font-size-complex="12pt"/>
    </style:style>
    <style:style style:name="P39" style:family="paragraph" style:parent-style-name="Table_20_Contents">
      <style:paragraph-properties fo:text-align="left" style:justify-single-word="false"/>
      <style:text-properties style:font-name="Liberation Sans" fo:font-size="12pt" officeooo:rsid="00a9fe2b" officeooo:paragraph-rsid="00a9fe2b" style:font-size-asian="12pt" style:font-name-complex="Galaxie Unicode Hebrew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officeooo:rsid="00ad88e8" officeooo:paragraph-rsid="00ad88e8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officeooo:rsid="00605368" officeooo:paragraph-rsid="00605368" style:font-size-asian="12pt" style:font-name-complex="Galaxie Unicode Hebrew" style:font-size-complex="12pt"/>
    </style:style>
    <style:style style:name="P42" style:family="paragraph" style:parent-style-name="Table_20_Contents">
      <style:paragraph-properties fo:text-align="left" style:justify-single-word="false"/>
      <style:text-properties style:font-name="Liberation Sans" fo:font-size="12pt" officeooo:rsid="0062a881" officeooo:paragraph-rsid="0062a881" style:font-size-asian="12pt" style:font-name-complex="Galaxie Unicode Hebrew" style:font-size-complex="12pt"/>
    </style:style>
    <style:style style:name="P43" style:family="paragraph" style:parent-style-name="Table_20_Contents">
      <style:paragraph-properties fo:text-align="left" style:justify-single-word="false"/>
      <style:text-properties style:font-name="Liberation Sans" fo:font-size="12pt" officeooo:rsid="006708ee" officeooo:paragraph-rsid="006708ee" style:font-size-asian="12pt" style:font-name-complex="Galaxie Unicode Hebrew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officeooo:rsid="00641c49" officeooo:paragraph-rsid="00641c4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officeooo:rsid="009342a1" officeooo:paragraph-rsid="009342a1" style:font-size-asian="12pt" style:font-name-complex="Galaxie Unicode Hebrew" style:font-size-complex="12pt"/>
    </style:style>
    <style:style style:name="P46" style:family="paragraph" style:parent-style-name="Table_20_Contents">
      <style:paragraph-properties fo:text-align="left" style:justify-single-word="false"/>
      <style:text-properties style:font-name="Liberation Sans" fo:font-size="12pt" officeooo:rsid="00b53a4e" officeooo:paragraph-rsid="00b53a4e" style:font-size-asian="12pt" style:font-name-complex="Galaxie Unicode Hebrew" style:font-size-complex="12pt"/>
    </style:style>
    <style:style style:name="P47" style:family="paragraph" style:parent-style-name="Table_20_Contents">
      <style:paragraph-properties fo:text-align="left" style:justify-single-word="false"/>
      <style:text-properties style:font-name="Liberation Sans" fo:font-size="12pt" officeooo:rsid="00b31062" officeooo:paragraph-rsid="00b31062" style:font-size-asian="12pt" style:font-name-complex="Galaxie Unicode Hebrew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officeooo:rsid="00b58de6" officeooo:paragraph-rsid="00b58de6" style:font-size-asian="12pt" style:font-size-complex="12pt"/>
    </style:style>
    <style:style style:name="P49" style:family="paragraph" style:parent-style-name="Table_20_Contents">
      <style:paragraph-properties fo:text-align="left" style:justify-single-word="false"/>
      <style:text-properties style:font-name="Liberation Sans" fo:font-size="12pt" officeooo:rsid="007c7fc0" officeooo:paragraph-rsid="007c7fc0" style:font-size-asian="12pt" style:font-name-complex="Galaxie Unicode Hebrew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officeooo:rsid="005f3218" officeooo:paragraph-rsid="005f321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officeooo:rsid="008dfb32" officeooo:paragraph-rsid="008dfb32" style:font-size-asian="12pt" style:font-name-complex="Galaxie Unicode Hebrew" style:font-size-complex="12pt"/>
    </style:style>
    <style:style style:name="P52" style:family="paragraph" style:parent-style-name="Table_20_Contents">
      <style:paragraph-properties fo:text-align="left" style:justify-single-word="false"/>
      <style:text-properties style:font-name="Liberation Sans" fo:font-size="12pt" officeooo:rsid="012c0a69" officeooo:paragraph-rsid="012c0a69" style:font-size-asian="12pt" style:font-name-complex="Galaxie Unicode Hebrew" style:font-size-complex="12pt"/>
    </style:style>
    <style:style style:name="P53" style:family="paragraph" style:parent-style-name="Table_20_Contents">
      <style:paragraph-properties fo:text-align="left" style:justify-single-word="false"/>
      <style:text-properties style:font-name="Liberation Sans" fo:font-size="12pt" officeooo:rsid="00b92f86" officeooo:paragraph-rsid="00b92f86" style:font-size-asian="12pt" style:font-name-complex="Galaxie Unicode Hebrew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Galaxie Unicode Hebrew" fo:font-size="12pt" style:font-size-asian="12pt" style:font-name-complex="Galaxie Unicode Hebrew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2pt" officeooo:rsid="00831302" officeooo:paragraph-rsid="00831302" style:font-size-asian="12pt" style:font-name-complex="Galaxie Unicode Hebrew" style:font-size-complex="12pt"/>
    </style:style>
    <style:style style:name="P56" style:family="paragraph" style:parent-style-name="Table_20_Contents">
      <style:paragraph-properties fo:text-align="left" style:justify-single-word="false"/>
      <style:text-properties style:font-name="Liberation Sans" fo:font-size="12pt" officeooo:rsid="0122ab55" officeooo:paragraph-rsid="0122ab55" style:font-size-asian="12pt" style:font-name-complex="Galaxie Unicode Hebrew" style:font-size-complex="12pt"/>
    </style:style>
    <style:style style:name="P57" style:family="paragraph" style:parent-style-name="Table_20_Contents">
      <style:paragraph-properties fo:text-align="left" style:justify-single-word="false"/>
      <style:text-properties style:font-name="Liberation Sans" fo:font-size="12pt" officeooo:rsid="008429e9" officeooo:paragraph-rsid="008429e9" style:font-size-asian="12pt" style:font-name-complex="Galaxie Unicode Hebrew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2pt" officeooo:rsid="008505cc" officeooo:paragraph-rsid="008505cc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2pt" officeooo:rsid="0121062b" officeooo:paragraph-rsid="0121062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2pt" officeooo:rsid="008623ea" officeooo:paragraph-rsid="008623ea" style:font-size-asian="12pt" style:font-name-complex="Galaxie Unicode Hebrew" style:font-size-complex="12pt"/>
    </style:style>
    <style:style style:name="P61" style:family="paragraph" style:parent-style-name="Table_20_Contents">
      <style:paragraph-properties fo:text-align="left" style:justify-single-word="false"/>
      <style:text-properties style:font-name="Liberation Sans" fo:font-size="12pt" officeooo:rsid="012545d1" officeooo:paragraph-rsid="012545d1" style:font-size-asian="12pt" style:font-name-complex="Galaxie Unicode Hebrew" style:font-size-complex="12pt"/>
    </style:style>
    <style:style style:name="P62" style:family="paragraph" style:parent-style-name="Table_20_Contents">
      <style:paragraph-properties fo:text-align="left" style:justify-single-word="false"/>
      <style:text-properties style:font-name="Liberation Sans" fo:font-size="12pt" officeooo:rsid="0087e769" officeooo:paragraph-rsid="00cdc564" style:font-size-asian="12pt" style:font-name-complex="Galaxie Unicode Hebrew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2pt" officeooo:rsid="008be096" officeooo:paragraph-rsid="008be096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2pt" officeooo:rsid="0133966f" officeooo:paragraph-rsid="0133966f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2pt" officeooo:rsid="0096f91f" officeooo:paragraph-rsid="0096f91f" style:font-size-asian="12pt" style:font-name-complex="Galaxie Unicode Hebrew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2pt" officeooo:rsid="01858e08" officeooo:paragraph-rsid="01858e08" style:font-size-asian="12pt" style:font-name-complex="Galaxie Unicode Hebrew" style:font-size-complex="12pt"/>
    </style:style>
    <style:style style:name="P67" style:family="paragraph" style:parent-style-name="Table_20_Contents">
      <style:paragraph-properties fo:text-align="left" style:justify-single-word="false"/>
      <style:text-properties style:font-name="Liberation Sans" fo:font-size="12pt" officeooo:rsid="00cbb372" officeooo:paragraph-rsid="00cbb372" style:font-size-asian="12pt" style:font-name-complex="Galaxie Unicode Hebrew" style:font-size-complex="12pt"/>
    </style:style>
    <style:style style:name="P68" style:family="paragraph" style:parent-style-name="Table_20_Contents">
      <style:paragraph-properties fo:text-align="left" style:justify-single-word="false"/>
      <style:text-properties style:font-name="Liberation Sans" fo:font-size="12pt" officeooo:rsid="00ccd494" officeooo:paragraph-rsid="00ccd494" style:font-size-asian="12pt" style:font-name-complex="Galaxie Unicode Hebrew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2pt" officeooo:rsid="00bccd3a" officeooo:paragraph-rsid="00bccd3a" style:font-size-asian="12pt" style:font-name-complex="Galaxie Unicode Hebrew" style:font-size-complex="12pt"/>
    </style:style>
    <style:style style:name="P71" style:family="paragraph" style:parent-style-name="Table_20_Contents">
      <style:paragraph-properties fo:text-align="left" style:justify-single-word="false"/>
      <style:text-properties style:font-name="Liberation Sans" fo:font-size="12pt" officeooo:rsid="00bccd3a" officeooo:paragraph-rsid="00bccd3a" style:font-size-asian="12pt" style:font-name-complex="Galaxie Unicode Hebrew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2pt" officeooo:rsid="00956d99" officeooo:paragraph-rsid="00956d99" style:font-size-asian="12pt" style:font-name-complex="Galaxie Unicode Hebrew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2pt" officeooo:rsid="00dbae1c" officeooo:paragraph-rsid="00dbae1c" style:font-size-asian="12pt" style:font-name-complex="Galaxie Unicode Hebrew" style:font-size-complex="12pt"/>
    </style:style>
    <style:style style:name="P74" style:family="paragraph" style:parent-style-name="Table_20_Contents">
      <style:paragraph-properties fo:text-align="left" style:justify-single-word="false"/>
      <style:text-properties style:font-name="Liberation Sans" fo:font-size="12pt" officeooo:rsid="00dc7ee1" officeooo:paragraph-rsid="00dc7ee1" style:font-size-asian="12pt" style:font-name-complex="Galaxie Unicode Hebrew" style:font-size-complex="12pt"/>
    </style:style>
    <style:style style:name="P75" style:family="paragraph" style:parent-style-name="Standard">
      <style:paragraph-properties fo:text-align="center" style:justify-single-word="false"/>
      <style:text-properties officeooo:rsid="00ebdd87" officeooo:paragraph-rsid="00ebdd87"/>
    </style:style>
    <style:style style:name="P76" style:family="paragraph" style:parent-style-name="Standard">
      <style:paragraph-properties fo:text-align="center" style:justify-single-word="false"/>
      <style:text-properties officeooo:rsid="00292caf" officeooo:paragraph-rsid="00292caf"/>
    </style:style>
    <style:style style:name="P77" style:family="paragraph" style:parent-style-name="Table_20_Contents">
      <style:text-properties fo:color="#127622" loext:opacity="100%" officeooo:paragraph-rsid="0157efed"/>
    </style:style>
    <style:style style:name="P78" style:family="paragraph" style:parent-style-name="Table_20_Contents">
      <style:text-properties officeooo:paragraph-rsid="016b2d65"/>
    </style:style>
    <style:style style:name="P79" style:family="paragraph" style:parent-style-name="Table_20_Contents">
      <style:text-properties officeooo:paragraph-rsid="0157da0b"/>
    </style:style>
    <style:style style:name="P80" style:family="paragraph" style:parent-style-name="Table_20_Contents">
      <style:text-properties fo:color="#127622" loext:opacity="100%" officeooo:paragraph-rsid="01584f78"/>
    </style:style>
    <style:style style:name="P81" style:family="paragraph" style:parent-style-name="Table_20_Contents">
      <style:text-properties officeooo:paragraph-rsid="016639af"/>
    </style:style>
    <style:style style:name="P82" style:family="paragraph" style:parent-style-name="Table_20_Contents">
      <style:text-properties fo:color="#127622" loext:opacity="100%" officeooo:paragraph-rsid="016639af"/>
    </style:style>
    <style:style style:name="P83" style:family="paragraph" style:parent-style-name="Table_20_Contents">
      <style:text-properties officeooo:rsid="00ff1040" officeooo:paragraph-rsid="016639af"/>
    </style:style>
    <style:style style:name="P84" style:family="paragraph" style:parent-style-name="Table_20_Contents">
      <style:text-properties officeooo:paragraph-rsid="00fddbbe"/>
    </style:style>
    <style:style style:name="P85" style:family="paragraph" style:parent-style-name="Table_20_Contents">
      <style:text-properties fo:color="#127622" loext:opacity="100%" style:font-name="Gabriela Nerd Font" officeooo:paragraph-rsid="01664885"/>
    </style:style>
    <style:style style:name="P86" style:family="paragraph" style:parent-style-name="Table_20_Contents">
      <style:text-properties officeooo:paragraph-rsid="01664885"/>
    </style:style>
    <style:style style:name="P87" style:family="paragraph" style:parent-style-name="Table_20_Contents">
      <style:text-properties fo:color="#127622" loext:opacity="100%" style:font-name="Gabriela Nerd Font" officeooo:paragraph-rsid="0169547d"/>
    </style:style>
    <style:style style:name="P88" style:family="paragraph" style:parent-style-name="Table_20_Contents">
      <style:text-properties officeooo:paragraph-rsid="0169547d"/>
    </style:style>
    <style:style style:name="P89" style:family="paragraph" style:parent-style-name="Table_20_Contents">
      <style:text-properties fo:color="#127622" loext:opacity="100%" style:font-name="Gabriela Nerd Font" officeooo:paragraph-rsid="016928ec"/>
    </style:style>
    <style:style style:name="P90" style:family="paragraph" style:parent-style-name="Table_20_Contents">
      <style:text-properties officeooo:paragraph-rsid="017188ac"/>
    </style:style>
    <style:style style:name="P91" style:family="paragraph" style:parent-style-name="Table_20_Contents">
      <style:text-properties fo:color="#127622" loext:opacity="100%" style:font-name="Gabriela Nerd Font" officeooo:paragraph-rsid="0168b9f0"/>
    </style:style>
    <style:style style:name="P92" style:family="paragraph" style:parent-style-name="Table_20_Contents">
      <style:text-properties officeooo:paragraph-rsid="0168b9f0"/>
    </style:style>
    <style:style style:name="P93" style:family="paragraph" style:parent-style-name="Table_20_Contents">
      <style:text-properties fo:color="#127622" loext:opacity="100%" style:font-name="Gabriela Nerd Font" officeooo:paragraph-rsid="0158f346"/>
    </style:style>
    <style:style style:name="P94" style:family="paragraph" style:parent-style-name="Table_20_Contents">
      <style:text-properties officeooo:paragraph-rsid="0158f346"/>
    </style:style>
    <style:style style:name="P95" style:family="paragraph" style:parent-style-name="Table_20_Contents">
      <style:text-properties officeooo:paragraph-rsid="015a0eff"/>
    </style:style>
    <style:style style:name="P96" style:family="paragraph" style:parent-style-name="Table_20_Contents">
      <style:text-properties fo:color="#127622" loext:opacity="100%" style:font-name="Gabriela Nerd Font" officeooo:paragraph-rsid="011e7fcf"/>
    </style:style>
    <style:style style:name="P97" style:family="paragraph" style:parent-style-name="Table_20_Contents">
      <style:text-properties fo:color="#127622" loext:opacity="100%" style:font-name="Gabriela Nerd Font" officeooo:paragraph-rsid="017eca6a"/>
    </style:style>
    <style:style style:name="P98" style:family="paragraph" style:parent-style-name="Table_20_Contents">
      <style:text-properties officeooo:rsid="0122ab55" officeooo:paragraph-rsid="017eca6a"/>
    </style:style>
    <style:style style:name="P99" style:family="paragraph" style:parent-style-name="Table_20_Contents">
      <style:text-properties officeooo:paragraph-rsid="0122ab55"/>
    </style:style>
    <style:style style:name="P100" style:family="paragraph" style:parent-style-name="Table_20_Contents">
      <style:text-properties fo:color="#127622" loext:opacity="100%" style:font-name="Gabriela Nerd Font" officeooo:paragraph-rsid="0180e095"/>
    </style:style>
    <style:style style:name="P101" style:family="paragraph" style:parent-style-name="Table_20_Contents">
      <style:text-properties officeooo:paragraph-rsid="0180e095"/>
    </style:style>
    <style:style style:name="P102" style:family="paragraph" style:parent-style-name="Table_20_Contents">
      <style:text-properties officeooo:paragraph-rsid="013b8425"/>
    </style:style>
    <style:style style:name="P103" style:family="paragraph" style:parent-style-name="Table_20_Contents">
      <style:text-properties fo:color="#127622" loext:opacity="100%" style:font-name="Gabriela Nerd Font" officeooo:paragraph-rsid="013b8425"/>
    </style:style>
    <style:style style:name="P104" style:family="paragraph" style:parent-style-name="Table_20_Contents">
      <style:text-properties fo:color="#127622" loext:opacity="100%" style:font-name="Gabriela Nerd Font" officeooo:rsid="0182fbed" officeooo:paragraph-rsid="0182fbed"/>
    </style:style>
    <style:style style:name="P105" style:family="paragraph" style:parent-style-name="Standard">
      <style:paragraph-properties fo:text-align="left" style:justify-single-word="false"/>
      <style:text-properties officeooo:paragraph-rsid="00292caf"/>
    </style:style>
    <style:style style:name="T1" style:family="text">
      <style:text-properties officeooo:rsid="014678d6"/>
    </style:style>
    <style:style style:name="T2" style:family="text">
      <style:text-properties officeooo:rsid="00766964"/>
    </style:style>
    <style:style style:name="T3" style:family="text">
      <style:text-properties officeooo:rsid="0099c8b5"/>
    </style:style>
    <style:style style:name="T4" style:family="text">
      <style:text-properties officeooo:rsid="009d81dc"/>
    </style:style>
    <style:style style:name="T5" style:family="text">
      <style:text-properties officeooo:rsid="006f3f3c"/>
    </style:style>
    <style:style style:name="T6" style:family="text">
      <style:text-properties officeooo:rsid="00702dd8"/>
    </style:style>
    <style:style style:name="T7" style:family="text">
      <style:text-properties officeooo:rsid="00714b52"/>
    </style:style>
    <style:style style:name="T8" style:family="text">
      <style:text-properties officeooo:rsid="0125ed8f"/>
    </style:style>
    <style:style style:name="T9" style:family="text">
      <style:text-properties officeooo:rsid="009e6679"/>
    </style:style>
    <style:style style:name="T10" style:family="text">
      <style:text-properties officeooo:rsid="009e4daa"/>
    </style:style>
    <style:style style:name="T11" style:family="text">
      <style:text-properties officeooo:rsid="009ffda4"/>
    </style:style>
    <style:style style:name="T12" style:family="text">
      <style:text-properties officeooo:rsid="00a03c03"/>
    </style:style>
    <style:style style:name="T13" style:family="text">
      <style:text-properties officeooo:rsid="00a4e820"/>
    </style:style>
    <style:style style:name="T14" style:family="text">
      <style:text-properties officeooo:rsid="00a5eac7"/>
    </style:style>
    <style:style style:name="T15" style:family="text">
      <style:text-properties officeooo:rsid="01296c7c"/>
    </style:style>
    <style:style style:name="T16" style:family="text">
      <style:text-properties officeooo:rsid="00726209"/>
    </style:style>
    <style:style style:name="T17" style:family="text">
      <style:text-properties officeooo:rsid="00732e49"/>
    </style:style>
    <style:style style:name="T18" style:family="text">
      <style:text-properties officeooo:rsid="0073c473"/>
    </style:style>
    <style:style style:name="T19" style:family="text">
      <style:text-properties officeooo:rsid="00784197"/>
    </style:style>
    <style:style style:name="T20" style:family="text">
      <style:text-properties officeooo:rsid="0078cd7b"/>
    </style:style>
    <style:style style:name="T21" style:family="text">
      <style:text-properties officeooo:rsid="00791e5b"/>
    </style:style>
    <style:style style:name="T22" style:family="text">
      <style:text-properties officeooo:rsid="007a89ae"/>
    </style:style>
    <style:style style:name="T23" style:family="text">
      <style:text-properties officeooo:rsid="007afa08"/>
    </style:style>
    <style:style style:name="T24" style:family="text">
      <style:text-properties officeooo:rsid="0149a70c"/>
    </style:style>
    <style:style style:name="T25" style:family="text">
      <style:text-properties officeooo:rsid="014a4243"/>
    </style:style>
    <style:style style:name="T26" style:family="text">
      <style:text-properties officeooo:rsid="014b464f"/>
    </style:style>
    <style:style style:name="T27" style:family="text">
      <style:text-properties officeooo:rsid="014bc506"/>
    </style:style>
    <style:style style:name="T28" style:family="text">
      <style:text-properties officeooo:rsid="014d0af7"/>
    </style:style>
    <style:style style:name="T29" style:family="text">
      <style:text-properties officeooo:rsid="014e3f67"/>
    </style:style>
    <style:style style:name="T30" style:family="text">
      <style:text-properties officeooo:rsid="00af59c8"/>
    </style:style>
    <style:style style:name="T31" style:family="text">
      <style:text-properties officeooo:rsid="012b4623"/>
    </style:style>
    <style:style style:name="T32" style:family="text">
      <style:text-properties officeooo:rsid="01684278"/>
    </style:style>
    <style:style style:name="T33" style:family="text">
      <style:text-properties officeooo:rsid="00aaf5c9"/>
    </style:style>
    <style:style style:name="T34" style:family="text">
      <style:text-properties officeooo:rsid="00aa8a85"/>
    </style:style>
    <style:style style:name="T35" style:family="text">
      <style:text-properties officeooo:rsid="00aaef64"/>
    </style:style>
    <style:style style:name="T36" style:family="text">
      <style:text-properties officeooo:rsid="00ab9c70"/>
    </style:style>
    <style:style style:name="T37" style:family="text">
      <style:text-properties officeooo:rsid="00ad88e8"/>
    </style:style>
    <style:style style:name="T38" style:family="text">
      <style:text-properties officeooo:rsid="006d9be1"/>
    </style:style>
    <style:style style:name="T39" style:family="text">
      <style:text-properties officeooo:rsid="0068fbb5"/>
    </style:style>
    <style:style style:name="T40" style:family="text">
      <style:text-properties officeooo:rsid="006a09a1"/>
    </style:style>
    <style:style style:name="T41" style:family="text">
      <style:text-properties officeooo:rsid="006a9b8f"/>
    </style:style>
    <style:style style:name="T42" style:family="text">
      <style:text-properties officeooo:rsid="006c95a1"/>
    </style:style>
    <style:style style:name="T43" style:family="text">
      <style:text-properties officeooo:rsid="012b6880"/>
    </style:style>
    <style:style style:name="T44" style:family="text">
      <style:text-properties officeooo:rsid="00b39296"/>
    </style:style>
    <style:style style:name="T45" style:family="text">
      <style:text-properties officeooo:rsid="0155a2eb"/>
    </style:style>
    <style:style style:name="T46" style:family="text">
      <style:text-properties officeooo:rsid="007e5a57"/>
    </style:style>
    <style:style style:name="T47" style:family="text">
      <style:text-properties officeooo:rsid="007e8cdf"/>
    </style:style>
    <style:style style:name="T48" style:family="text">
      <style:text-properties officeooo:rsid="007fd54b"/>
    </style:style>
    <style:style style:name="T49" style:family="text">
      <style:text-properties officeooo:rsid="00b97862"/>
    </style:style>
    <style:style style:name="T50" style:family="text">
      <style:text-properties officeooo:rsid="00ba4bd9"/>
    </style:style>
    <style:style style:name="T51" style:family="text">
      <style:text-properties officeooo:rsid="0084a6f9"/>
    </style:style>
    <style:style style:name="T52" style:family="text">
      <style:text-properties officeooo:rsid="012d9033"/>
    </style:style>
    <style:style style:name="T53" style:family="text">
      <style:text-properties officeooo:rsid="00cdc564"/>
    </style:style>
    <style:style style:name="T54" style:family="text">
      <style:text-properties officeooo:rsid="008af6ef"/>
    </style:style>
    <style:style style:name="T55" style:family="text">
      <style:text-properties officeooo:rsid="0089bf48"/>
    </style:style>
    <style:style style:name="T56" style:family="text">
      <style:text-properties officeooo:rsid="008b14af"/>
    </style:style>
    <style:style style:name="T57" style:family="text">
      <style:text-properties officeooo:rsid="012ed996"/>
    </style:style>
    <style:style style:name="T58" style:family="text">
      <style:text-properties officeooo:rsid="00cec44b"/>
    </style:style>
    <style:style style:name="T59" style:family="text">
      <style:text-properties officeooo:rsid="00d009ee"/>
    </style:style>
    <style:style style:name="T60" style:family="text">
      <style:text-properties officeooo:rsid="00d49884"/>
    </style:style>
    <style:style style:name="T61" style:family="text">
      <style:text-properties officeooo:rsid="00d97d51"/>
    </style:style>
    <style:style style:name="T62" style:family="text">
      <style:text-properties officeooo:rsid="00d13ebc"/>
    </style:style>
    <style:style style:name="T63" style:family="text">
      <style:text-properties officeooo:rsid="00d1596a"/>
    </style:style>
    <style:style style:name="T64" style:family="text">
      <style:text-properties officeooo:rsid="00d650a9"/>
    </style:style>
    <style:style style:name="T65" style:family="text">
      <style:text-properties officeooo:rsid="00d31e56"/>
    </style:style>
    <style:style style:name="T66" style:family="text">
      <style:text-properties officeooo:rsid="00d7a054"/>
    </style:style>
    <style:style style:name="T67" style:family="text">
      <style:text-properties officeooo:rsid="00d9fe0b"/>
    </style:style>
    <style:style style:name="T68" style:family="text">
      <style:text-properties officeooo:rsid="00c0ab57"/>
    </style:style>
    <style:style style:name="T69" style:family="text">
      <style:text-properties officeooo:rsid="00bec8ec"/>
    </style:style>
    <style:style style:name="T70" style:family="text">
      <style:text-properties officeooo:rsid="00c1ca03"/>
    </style:style>
    <style:style style:name="T71" style:family="text">
      <style:text-properties officeooo:rsid="00c5156a"/>
    </style:style>
    <style:style style:name="T72" style:family="text">
      <style:text-properties officeooo:rsid="00c219fd"/>
    </style:style>
    <style:style style:name="T73" style:family="text">
      <style:text-properties officeooo:rsid="00c3f15d"/>
    </style:style>
    <style:style style:name="T74" style:family="text">
      <style:text-properties officeooo:rsid="00c52d6c"/>
    </style:style>
    <style:style style:name="T75" style:family="text">
      <style:text-properties officeooo:rsid="00c66e93"/>
    </style:style>
    <style:style style:name="T76" style:family="text">
      <style:text-properties officeooo:rsid="00c69156"/>
    </style:style>
    <style:style style:name="T77" style:family="text">
      <style:text-properties officeooo:rsid="00c76ea9"/>
    </style:style>
    <style:style style:name="T78" style:family="text">
      <style:text-properties officeooo:rsid="00ca9c28"/>
    </style:style>
    <style:style style:name="T79" style:family="text">
      <style:text-properties officeooo:rsid="00c7cdda"/>
    </style:style>
    <style:style style:name="T80" style:family="text">
      <style:text-properties officeooo:rsid="00c7e9df"/>
    </style:style>
    <style:style style:name="T81" style:family="text">
      <style:text-properties officeooo:rsid="00c8bef0"/>
    </style:style>
    <style:style style:name="T82" style:family="text">
      <style:text-properties officeooo:rsid="0131d74d"/>
    </style:style>
    <style:style style:name="T83" style:family="text">
      <style:text-properties officeooo:rsid="0186d98d"/>
    </style:style>
    <style:style style:name="T84" style:family="text">
      <style:text-properties officeooo:rsid="0157efed"/>
    </style:style>
    <style:style style:name="T85" style:family="text">
      <style:text-properties style:text-position="33% 80%"/>
    </style:style>
    <style:style style:name="T86" style:family="text">
      <style:text-properties fo:background-color="#fff5ce" loext:char-shading-value="0"/>
    </style:style>
    <style:style style:name="T87" style:family="text">
      <style:text-properties style:text-position="super 58%"/>
    </style:style>
    <style:style style:name="T88" style:family="text">
      <style:text-properties fo:font-style="italic"/>
    </style:style>
    <style:style style:name="T89" style:family="text">
      <style:text-properties officeooo:rsid="00fd63f1"/>
    </style:style>
    <style:style style:name="T90" style:family="text">
      <style:text-properties officeooo:rsid="01350f91"/>
    </style:style>
    <style:style style:name="T91" style:family="text">
      <style:text-properties fo:color="#127622" loext:opacity="100%"/>
    </style:style>
    <style:style style:name="T92" style:family="text">
      <style:text-properties fo:color="#127622" loext:opacity="100%" officeooo:rsid="00ffc152"/>
    </style:style>
    <style:style style:name="T93" style:family="text">
      <style:text-properties fo:background-color="#ffff00" loext:char-shading-value="0"/>
    </style:style>
    <style:style style:name="T94" style:family="text">
      <style:text-properties style:text-position="super 58%" officeooo:rsid="00fef1c9"/>
    </style:style>
    <style:style style:name="T95" style:family="text">
      <style:text-properties officeooo:rsid="016722d9"/>
    </style:style>
    <style:style style:name="T96" style:family="text">
      <style:text-properties fo:font-weight="bold" officeooo:rsid="016722d9" style:font-weight-asian="bold" style:font-weight-complex="bold"/>
    </style:style>
    <style:style style:name="T97" style:family="text">
      <style:text-properties officeooo:rsid="018987ef"/>
    </style:style>
    <style:style style:name="T98" style:family="text">
      <style:text-properties officeooo:rsid="018849b0"/>
    </style:style>
    <style:style style:name="T99" style:family="text">
      <style:text-properties style:text-position="super 58%" officeooo:rsid="01011982"/>
    </style:style>
    <style:style style:name="T100" style:family="text">
      <style:text-properties officeooo:rsid="010b9e22"/>
    </style:style>
    <style:style style:name="T101" style:family="text">
      <style:text-properties officeooo:rsid="017188ac"/>
    </style:style>
    <style:style style:name="T102" style:family="text">
      <style:text-properties officeooo:rsid="016d6ae1"/>
    </style:style>
    <style:style style:name="T103" style:family="text">
      <style:text-properties officeooo:rsid="0170ec4a"/>
    </style:style>
    <style:style style:name="T104" style:family="text">
      <style:text-properties officeooo:rsid="016f4f65"/>
    </style:style>
    <style:style style:name="T105" style:family="text">
      <style:text-properties style:text-position="super 58%" officeooo:rsid="0109a4c6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color="#127622" loext:opacity="100%" style:font-name="Gabriela Nerd Font"/>
    </style:style>
    <style:style style:name="T108" style:family="text">
      <style:text-properties fo:background-color="#dee6ef" loext:char-shading-value="0"/>
    </style:style>
    <style:style style:name="T109" style:family="text">
      <style:text-properties officeooo:rsid="011955cf"/>
    </style:style>
    <style:style style:name="T110" style:family="text">
      <style:text-properties officeooo:rsid="011cc852"/>
    </style:style>
    <style:style style:name="T111" style:family="text">
      <style:text-properties officeooo:rsid="011ac5b5"/>
    </style:style>
    <style:style style:name="T112" style:family="text">
      <style:text-properties style:text-position="super 58%" officeooo:rsid="01194bc5"/>
    </style:style>
    <style:style style:name="T113" style:family="text">
      <style:text-properties officeooo:rsid="015b9127"/>
    </style:style>
    <style:style style:name="T114" style:family="text">
      <style:text-properties officeooo:rsid="015b9c36"/>
    </style:style>
    <style:style style:name="T115" style:family="text">
      <style:text-properties officeooo:rsid="0162aaeb"/>
    </style:style>
    <style:style style:name="T116" style:family="text">
      <style:text-properties officeooo:rsid="015da260"/>
    </style:style>
    <style:style style:name="T117" style:family="text">
      <style:text-properties officeooo:rsid="018a088e"/>
    </style:style>
    <style:style style:name="T118" style:family="text">
      <style:text-properties officeooo:rsid="018abe3c"/>
    </style:style>
    <style:style style:name="T119" style:family="text">
      <style:text-properties officeooo:rsid="0179db70"/>
    </style:style>
    <style:style style:name="T120" style:family="text">
      <style:text-properties officeooo:rsid="018b3f63"/>
    </style:style>
    <style:style style:name="T121" style:family="text">
      <style:text-properties officeooo:rsid="017bd830"/>
    </style:style>
    <style:style style:name="T122" style:family="text">
      <style:text-properties style:text-position="super 58%" officeooo:rsid="01031987"/>
    </style:style>
    <style:style style:name="T123" style:family="text">
      <style:text-properties style:text-position="super 58%" officeooo:rsid="011f4240"/>
    </style:style>
    <style:style style:name="T124" style:family="text">
      <style:text-properties officeooo:rsid="018cb934"/>
    </style:style>
    <style:style style:name="T125" style:family="text">
      <style:text-properties officeooo:rsid="018e36f4"/>
    </style:style>
    <style:style style:name="T126" style:family="text">
      <style:text-properties officeooo:rsid="01836d84"/>
    </style:style>
    <style:style style:name="T127" style:family="text">
      <style:text-properties style:text-position="super 58%" officeooo:rsid="0101e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/men does not always mean mal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">Hebrew</text:p>
            <text:p text:style-name="P3">(pronunciation)</text:p>
          </table:table-cell>
          <table:table-cell table:style-name="Table4.A1" office:value-type="string">
            <text:p text:style-name="P4">Strongs</text:p>
          </table:table-cell>
          <table:table-cell table:style-name="Table4.A1" office:value-type="string">
            <text:p text:style-name="P5">Hebrew</text:p>
            <text:p text:style-name="P6"><text:span text:style-name="T1">d</text:span>ictionary</text:p>
          </table:table-cell>
          <table:table-cell table:style-name="Table4.A1" office:value-type="string">
            <text:p text:style-name="P7">KJV usage</text:p>
          </table:table-cell>
          <table:table-cell table:style-name="Table4.A1" office:value-type="string">
            <text:p text:style-name="P8"><text:span text:style-name="T2">M</text:span>ale</text:p>
          </table:table-cell>
          <table:table-cell table:style-name="Table4.F1" office:value-type="string">
            <text:p text:style-name="P9">M</text:p>
            <text:p text:style-name="P9">and/or</text:p>
            <text:p text:style-name="P9">F</text:p>
          </table:table-cell>
        </table:table-row>
        <table:table-row table:style-name="Table4.1">
          <table:table-cell table:style-name="Table4.A2" office:value-type="string">
            <text:p text:style-name="P10">אֶבְיֹון</text:p>
            <text:p text:style-name="P11">(ʼâb | awb)</text:p>
          </table:table-cell>
          <table:table-cell table:style-name="Table4.A2" office:value-type="string">
            <text:p text:style-name="P12">H34</text:p>
          </table:table-cell>
          <table:table-cell table:style-name="Table4.A2" office:value-type="string">
            <text:p text:style-name="P13">Pauper</text:p>
          </table:table-cell>
          <table:table-cell table:style-name="Table4.A2" office:value-type="string">
            <text:p text:style-name="P14"><text:span text:style-name="T3">Poor man, </text:span><text:span text:style-name="T4">p</text:span>oor, needy, beggar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ָדָם</text:p>
            <text:p text:style-name="P11">(ʼâdâm | aw-dawm')</text:p>
          </table:table-cell>
          <table:table-cell table:style-name="Table4.A2" office:value-type="string">
            <text:p text:style-name="P18">H120</text:p>
          </table:table-cell>
          <table:table-cell table:style-name="Table4.A2" office:value-type="string">
            <text:p text:style-name="P19">Person, man, human being, individual</text:p>
          </table:table-cell>
          <table:table-cell table:style-name="Table4.A2" office:value-type="string">
            <text:p text:style-name="P20">Man, Adam, <text:span text:style-name="T5">men, </text:span><text:span text:style-name="T6">persons, </text:span><text:span text:style-name="T7">hypocrite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ֶחָד</text:p>
            <text:p text:style-name="P11">(ʼechâd | ekh-awd')</text:p>
          </table:table-cell>
          <table:table-cell table:style-name="Table4.A2" office:value-type="string">
            <text:p text:style-name="P21">H259</text:p>
          </table:table-cell>
          <table:table-cell table:style-name="Table4.A2" office:value-type="string">
            <text:p text:style-name="P22">One, <text:span text:style-name="T8">single, unique, first, former, someone, somebody, simultaneously, at the same time, at one and the same time</text:span></text:p>
          </table:table-cell>
          <table:table-cell table:style-name="Table4.A2" office:value-type="string">
            <text:p text:style-name="P23"><text:span text:style-name="T9">A man, a certain, o</text:span>ne, first, <text:span text:style-name="T10">few, eleven, some, </text:span><text:span text:style-name="T11">another, every, every one, </text:span><text:span text:style-name="T12">any, </text:span><text:span text:style-name="T13">shall be a, shall be alike, </text:span><text:span text:style-name="T14">highway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17">אִישׁ</text:p>
            <text:p text:style-name="P11">(ʼîysh | eesh)</text:p>
          </table:table-cell>
          <table:table-cell table:style-name="Table4.A2" office:value-type="string">
            <text:p text:style-name="P24">H376</text:p>
          </table:table-cell>
          <table:table-cell table:style-name="Table4.A2" office:value-type="string">
            <text:p text:style-name="P25">(an) <text:span text:style-name="T15">i</text:span>sland, isle</text:p>
          </table:table-cell>
          <table:table-cell table:style-name="Table4.A2" office:value-type="string">
            <text:p text:style-name="P26">Man, <text:span text:style-name="T16">champion, husband, footmen, </text:span><text:span text:style-name="T17">goodman, mighty man, </text:span><text:span text:style-name="T18">mankind</text:span></text:p>
          </table:table-cell>
          <table:table-cell table:style-name="Table4.A2" office:value-type="string">
            <text:p text:style-name="P15">X</text:p>
          </table:table-cell>
          <table:table-cell table:style-name="Table4.F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27">אֱנֹושׁ</text:p>
            <text:p text:style-name="P11">(ʼĕnôwsh | en-oshe')</text:p>
          </table:table-cell>
          <table:table-cell table:style-name="Table4.A2" office:value-type="string">
            <text:p text:style-name="P24">H582</text:p>
          </table:table-cell>
          <table:table-cell table:style-name="Table4.A2" office:value-type="string">
            <text:p text:style-name="P28">Mortal</text:p>
          </table:table-cell>
          <table:table-cell table:style-name="Table4.A2" office:value-type="string">
            <text:p text:style-name="P29">Men, <text:span text:style-name="T19">archers, </text:span><text:span text:style-name="T20">merchantman, chapmen, </text:span><text:span text:style-name="T21">flower of their age, </text:span><text:span text:style-name="T22">man, </text:span><text:span text:style-name="T23">husbands</text:span></text:p>
          </table:table-cell>
          <table:table-cell table:style-name="Table4.A2" office:value-type="string">
            <text:p text:style-name="P30">X</text:p>
          </table:table-cell>
          <table:table-cell table:style-name="Table4.F2" office:value-type="string">
            <text:p text:style-name="P30"/>
          </table:table-cell>
        </table:table-row>
        <table:table-row table:style-name="Table4.1">
          <table:table-cell table:style-name="Table4.A2" office:value-type="string">
            <text:p text:style-name="P27">בֵּן</text:p>
            <text:p text:style-name="P31">(bên | bane)</text:p>
          </table:table-cell>
          <table:table-cell table:style-name="Table4.A2" office:value-type="string">
            <text:p text:style-name="P32">H1121</text:p>
          </table:table-cell>
          <table:table-cell table:style-name="Table4.A2" office:value-type="string">
            <text:p text:style-name="P33">Son, boy</text:p>
          </table:table-cell>
          <table:table-cell table:style-name="Table4.A2" office:value-type="string">
            <text:p text:style-name="P34">Child<text:span text:style-name="T24">(ren)</text:span>, son(s), <text:span text:style-name="T25">daughter(s), </text:span><text:span text:style-name="T26">father, </text:span><text:span text:style-name="T27">colt(s), </text:span><text:span text:style-name="T28">father, hostages, kids, lambs, men/man, </text:span><text:span text:style-name="T29">people, nephews, son, stranger, whelps, young, youths</text:span></text:p>
          </table:table-cell>
          <table:table-cell table:style-name="Table4.A2" office:value-type="string">
            <text:p text:style-name="P30"/>
          </table:table-cell>
          <table:table-cell table:style-name="Table4.F2" office:value-type="string">
            <text:p text:style-name="P35">X</text:p>
          </table:table-cell>
        </table:table-row>
        <table:table-row table:style-name="Table4.1">
          <table:table-cell table:style-name="Table4.A2" office:value-type="string">
            <text:p text:style-name="P36">בַּעַל</text:p>
            <text:p text:style-name="P11">(baʻal | bah'-al)</text:p>
          </table:table-cell>
          <table:table-cell table:style-name="Table4.A2" office:value-type="string">
            <text:p text:style-name="P37">H1167 <text:span text:style-name="T30">(H1168)</text:span></text:p>
          </table:table-cell>
          <table:table-cell table:style-name="Table4.A2" office:value-type="string">
            <text:p text:style-name="P38">Husband, <text:span text:style-name="T31">owner, possessor, possessed of, having, Baal (</text:span><text:span text:style-name="T32">lord; </text:span><text:span text:style-name="T31">Canaanite god)</text:span></text:p>
          </table:table-cell>
          <table:table-cell table:style-name="Table4.A2" office:value-type="string">
            <text:p text:style-name="P39">Captain, babbler, men/<text:span text:style-name="T33">man</text:span>, owner, horsemen, masters, dreamer, <text:span text:style-name="T34">creditor, </text:span><text:span text:style-name="T35">husband</text:span><text:span text:style-name="T36">(s)</text:span><text:span text:style-name="T35">, chief man, </text:span><text:span text:style-name="T36">archers, </text:span><text:span text:style-name="T37">who is mine adversary</text:span></text:p>
          </table:table-cell>
          <table:table-cell table:style-name="Table4.A2" office:value-type="string">
            <text:p text:style-name="P40">X</text:p>
          </table:table-cell>
          <table:table-cell table:style-name="Table4.F2" office:value-type="string">
            <text:p text:style-name="P40"/>
          </table:table-cell>
        </table:table-row>
        <table:table-row table:style-name="Table4.1">
          <table:table-cell table:style-name="Table4.A2" office:value-type="string">
            <text:p text:style-name="P36">גִּבֹּור</text:p>
            <text:p text:style-name="P11">(gibbôwr | ghib-bore')</text:p>
          </table:table-cell>
          <table:table-cell table:style-name="Table4.A2" office:value-type="string">
            <text:p text:style-name="P41">H1368</text:p>
          </table:table-cell>
          <table:table-cell table:style-name="Table4.A2" office:value-type="string">
            <text:p text:style-name="P42">Hero</text:p>
          </table:table-cell>
          <table:table-cell table:style-name="Table4.A2" office:value-type="string">
            <text:p text:style-name="P43">Mighty men, mighty one<text:span text:style-name="T38">(s)</text:span>, mighty, strong, man, <text:span text:style-name="T39">valiant, </text:span><text:span text:style-name="T40">chief, </text:span><text:span text:style-name="T41">giant, </text:span><text:span text:style-name="T42">excel</text:span></text:p>
          </table:table-cell>
          <table:table-cell table:style-name="Table4.A2" office:value-type="string">
            <text:p text:style-name="P44">X</text:p>
          </table:table-cell>
          <table:table-cell table:style-name="Table4.F2" office:value-type="string">
            <text:p text:style-name="P44"/>
          </table:table-cell>
        </table:table-row>
        <table:table-row table:style-name="Table4.1">
          <table:table-cell table:style-name="Table4.A2" office:value-type="string">
            <text:p text:style-name="P36">גֶּבֶר</text:p>
            <text:p text:style-name="P11">(geber | gheh'-ber)</text:p>
          </table:table-cell>
          <table:table-cell table:style-name="Table4.A2" office:value-type="string">
            <text:p text:style-name="P45">H1397</text:p>
          </table:table-cell>
          <table:table-cell table:style-name="Table4.A2" office:value-type="string">
            <text:p text:style-name="P46">Man, <text:span text:style-name="T43">male</text:span></text:p>
          </table:table-cell>
          <table:table-cell table:style-name="Table4.A2" office:value-type="string">
            <text:p text:style-name="P47">man/men, mighty, man child, <text:span text:style-name="T44">every one </text:span><text:span text:style-name="T45">(of his)</text:span></text:p>
          </table:table-cell>
          <table:table-cell table:style-name="Table4.A2" office:value-type="string">
            <text:p text:style-name="P48">X</text:p>
          </table:table-cell>
          <table:table-cell table:style-name="Table4.F2" office:value-type="string">
            <text:p text:style-name="P48"/>
          </table:table-cell>
        </table:table-row>
        <table:table-row table:style-name="Table4.1">
          <table:table-cell table:style-name="Table4.A2" office:value-type="string">
            <text:p text:style-name="P36">זָכָר</text:p>
            <text:p text:style-name="P11">(zâkâr | zaw-kawr')</text:p>
          </table:table-cell>
          <table:table-cell table:style-name="Table4.A2" office:value-type="string">
            <text:p text:style-name="P24">H2145</text:p>
          </table:table-cell>
          <table:table-cell table:style-name="Table4.A2" office:value-type="string">
            <text:p text:style-name="P28">Male, <text:span text:style-name="T43">man, masculine gender</text:span></text:p>
          </table:table-cell>
          <table:table-cell table:style-name="Table4.A2" office:value-type="string">
            <text:p text:style-name="P49">Male<text:span text:style-name="T46">(s)</text:span>, man child, <text:span text:style-name="T47">mankind, </text:span><text:span text:style-name="T48">him</text:span></text:p>
          </table:table-cell>
          <table:table-cell table:style-name="Table4.A2" office:value-type="string">
            <text:p text:style-name="P50">X</text:p>
          </table:table-cell>
          <table:table-cell table:style-name="Table4.F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36">זָקֵן</text:p>
            <text:p text:style-name="P11">(zâqên | zaw-kane')</text:p>
          </table:table-cell>
          <table:table-cell table:style-name="Table4.A2" office:value-type="string">
            <text:p text:style-name="P51">H2205</text:p>
          </table:table-cell>
          <table:table-cell table:style-name="Table4.A2" office:value-type="string">
            <text:p text:style-name="P52">Old person, old man, wise person, sage</text:p>
          </table:table-cell>
          <table:table-cell table:style-name="Table4.A2" office:value-type="string">
            <text:p text:style-name="P53">Ancient, elders, old, senators, aged, old man/<text:span text:style-name="T49">men</text:span>, old men’s, <text:span text:style-name="T50">old woman</text:span></text:p>
          </table:table-cell>
          <table:table-cell table:style-name="Table4.A2" office:value-type="string">
            <text:p text:style-name="P50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יֶלֶד</text:p>
            <text:p text:style-name="P11">(yeled | yeh'-led)</text:p>
          </table:table-cell>
          <table:table-cell table:style-name="Table4.A2" office:value-type="string">
            <text:p text:style-name="P55">H3206</text:p>
          </table:table-cell>
          <table:table-cell table:style-name="Table4.A2" office:value-type="string">
            <text:p text:style-name="P56">Son, boy, child, kid</text:p>
          </table:table-cell>
          <table:table-cell table:style-name="Table4.A2" office:value-type="string">
            <text:p text:style-name="P57">Boy, child, children, young man/men, <text:span text:style-name="T51">fruit, young ones</text:span></text:p>
          </table:table-cell>
          <table:table-cell table:style-name="Table4.A2" office:value-type="string">
            <text:p text:style-name="P58"/>
          </table:table-cell>
          <table:table-cell table:style-name="Table4.F2" office:value-type="string">
            <text:p text:style-name="P59">X</text:p>
          </table:table-cell>
        </table:table-row>
        <table:table-row table:style-name="Table4.1">
          <table:table-cell table:style-name="Table4.A2" office:value-type="string">
            <text:p text:style-name="P54">נַעַר</text:p>
            <text:p text:style-name="P11">(naʻar | nah'-ar)</text:p>
          </table:table-cell>
          <table:table-cell table:style-name="Table4.A2" office:value-type="string">
            <text:p text:style-name="P60">H5288</text:p>
          </table:table-cell>
          <table:table-cell table:style-name="Table4.A2" office:value-type="string">
            <text:p text:style-name="P61">Youth, youngster, adolescent, minor, servant, <text:span text:style-name="T52">armsbearer</text:span></text:p>
          </table:table-cell>
          <table:table-cell table:style-name="Table4.A2" office:value-type="string">
            <text:p text:style-name="P62"><text:span text:style-name="T53">Y</text:span>oung men/man, <text:span text:style-name="T53">c</text:span>hild, lad, babe, servant<text:span text:style-name="T54">(</text:span>s<text:span text:style-name="T54">)</text:span>, <text:span text:style-name="T55">boys, </text:span><text:span text:style-name="T56">youths</text:span></text:p>
          </table:table-cell>
          <table:table-cell table:style-name="Table4.A2" office:value-type="string">
            <text:p text:style-name="P63"/>
          </table:table-cell>
          <table:table-cell table:style-name="Table4.F2" office:value-type="string">
            <text:p text:style-name="P64">X</text:p>
          </table:table-cell>
        </table:table-row>
        <table:table-row table:style-name="Table4.1">
          <table:table-cell table:style-name="Table4.A2" office:value-type="string">
            <text:p text:style-name="P54">נָפַל</text:p>
            <text:p text:style-name="P11">(nâphal | naw-fal')</text:p>
          </table:table-cell>
          <table:table-cell table:style-name="Table4.A2" office:value-type="string">
            <text:p text:style-name="P65">H5307</text:p>
            <text:p text:style-name="P66">primitive root</text:p>
          </table:table-cell>
          <table:table-cell table:style-name="Table4.A2" office:value-type="string">
            <text:p text:style-name="P67">Fell, <text:span text:style-name="T57">to fall, to stumble, to drop, to decline, to collapse, to be defeated, to surrender, to be conquered, to be killed, to fall by the wayside, to descend, to be inferior to</text:span></text:p>
          </table:table-cell>
          <table:table-cell table:style-name="Table4.A2" office:value-type="string">
            <text:p text:style-name="P68">Any man, <text:span text:style-name="T58">fall, </text:span><text:span text:style-name="T59">fallen, falleth, </text:span><text:span text:style-name="T60">fail</text:span><text:span text:style-name="T61">(ed)</text:span><text:span text:style-name="T60">, </text:span><text:span text:style-name="T58">overthrow, inferior, cast, </text:span><text:span text:style-name="T62">smite, lighted, </text:span><text:span text:style-name="T63">present</text:span><text:span text:style-name="T64">(</text:span><text:span text:style-name="T63">ing</text:span><text:span text:style-name="T64">)</text:span><text:span text:style-name="T63">, </text:span><text:span text:style-name="T65">fugitives, </text:span><text:span text:style-name="T60">divided, </text:span><text:span text:style-name="T64">shall be judged, </text:span><text:span text:style-name="T66">shall be lost, lay, lie down, </text:span><text:span text:style-name="T61">slew, </text:span><text:span text:style-name="T67">ceased, overwhelm</text:span>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נֶפֶשׁ</text:p>
            <text:p text:style-name="P11">(nephesh | neh'-fesh)</text:p>
          </table:table-cell>
          <table:table-cell table:style-name="Table4.A2" office:value-type="string">
            <text:p text:style-name="P51">H5315</text:p>
          </table:table-cell>
          <table:table-cell table:style-name="Table4.A2" office:value-type="string">
            <text:p text:style-name="P70">Mental, soul, mind</text:p>
          </table:table-cell>
          <table:table-cell table:style-name="Table4.A2" office:value-type="string">
            <text:p text:style-name="P71"><text:span text:style-name="T53">Every man, b</text:span>east, soul(s), desire, life, <text:span text:style-name="T68">person(s), </text:span><text:span text:style-name="T69">any </text:span>person, <text:span text:style-name="T69">thing, every creature, </text:span><text:span text:style-name="T70">tablets, pleasure, </text:span><text:span text:style-name="T71">dead, </text:span><text:span text:style-name="T72">dead body, </text:span><text:span text:style-name="T73">hearty, himself, </text:span><text:span text:style-name="T74">fish, lust, </text:span><text:span text:style-name="T75">he, herself, </text:span><text:span text:style-name="T76">mortally, </text:span><text:span text:style-name="T77">mind</text:span><text:span text:style-name="T78">(</text:span><text:span text:style-name="T77">s</text:span><text:span text:style-name="T78">)</text:span><text:span text:style-name="T77">, </text:span><text:span text:style-name="T79">ghost, </text:span><text:span text:style-name="T80">appetite, </text:span><text:span text:style-name="T81">yourselves</text:span>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  <table:table-row table:style-name="Table4.1">
          <table:table-cell table:style-name="Table4.A2" office:value-type="string">
            <text:p text:style-name="P54">עִבְרִי</text:p>
            <text:p text:style-name="P11">(ʻIbrîy | ib-ree')</text:p>
          </table:table-cell>
          <table:table-cell table:style-name="Table4.A2" office:value-type="string">
            <text:p text:style-name="P72">H5680</text:p>
          </table:table-cell>
          <table:table-cell table:style-name="Table4.A2" office:value-type="string">
            <text:p text:style-name="P73"><text:span text:style-name="T82">Israelite, </text:span>Hebrew, <text:span text:style-name="T82">Jewish</text:span></text:p>
          </table:table-cell>
          <table:table-cell table:style-name="Table4.A2" office:value-type="string">
            <text:p text:style-name="P74">Hebrew man, Hebrew woman, Hebrew(s/ess)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16">X</text:p>
          </table:table-cell>
        </table:table-row>
      </table:table>
      <text:p text:style-name="P75"/>
      <text:p text:style-name="P76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77">Numbers 22:21-22</text:p>
            <text:p text:style-name="P78">(<text:span text:style-name="T83">young </text:span><text:span text:style-name="T84">male</text:span><text:span text:style-name="T83">s</text:span><text:span text:style-name="T84"> </text:span><text:span text:style-name="T83">and/</text:span><text:span text:style-name="T84">or female</text:span><text:span text:style-name="T83">s</text:span>)</text:p>
            <text:p text:style-name="P78"><text:line-break/><text:span text:style-name="T85">21</text:span> And Balaam rose up in the morning, and saddled his ass, and went with the princes of Moab.</text:p>
            <text:p text:style-name="P79"><text:span text:style-name="T85">22</text:span> And God's anger was kindled because he went: and the angel of the LORD stood in the way for an adversary against him. Now he was riding upon his ass, and his two <text:span text:style-name="T86">servants</text:span><text:span text:style-name="T87">H5288</text:span> <text:span text:style-name="T88">were</text:span> with him.</text:p>
          </table:table-cell>
        </table:table-row>
        <table:table-row table:style-name="Table11.1">
          <table:table-cell table:style-name="Table11.A2" office:value-type="string">
            <text:p text:style-name="P80">Judges 7:9-11</text:p>
            <text:p text:style-name="P78">(Gideon’s servant, Phurah, <text:span text:style-name="T89">was</text:span> a<text:span text:style-name="T90">n adolescent</text:span>)</text:p>
            <text:p text:style-name="P78"><text:line-break/><text:span text:style-name="T85">9</text:span> And it came to pass the same night, that the LORD said unto him, Arise, get thee down unto the host; for I have delivered it into thine hand.</text:p>
            <text:p text:style-name="P79"><text:span text:style-name="T85">10</text:span> But if thou fear to go down, go thou with Phurah <text:span text:style-name="T86">thy servant</text:span><text:span text:style-name="T87">H5288</text:span> down to the host:</text:p>
            <text:p text:style-name="P79"><text:span text:style-name="T85">11</text:span> And thou shalt hear what they say; and afterward shall thine hands be strengthened to go down unto the host. Then went he down with Phurah <text:span text:style-name="T86">his servant</text:span><text:span text:style-name="T87">H5288</text:span> unto the outside of the armed men that <text:span text:style-name="T88">were</text:span> in the host.</text:p>
          </table:table-cell>
        </table:table-row>
        <table:table-row table:style-name="Table11.1">
          <table:table-cell table:style-name="Table11.A2" office:value-type="string">
            <text:p text:style-name="P81"><text:span text:style-name="T91">Judges 19:3,</text:span><text:span text:style-name="T92">9,11-13,19</text:span></text:p>
            <text:p text:style-name="P78">(the Levite’s servant was a young male)</text:p>
            <text:p text:style-name="P78"><text:line-break/><text:span text:style-name="T87">3</text:span> And her husband arose, and went after her, to speak friendly unto her, <text:span text:style-name="T88">and</text:span> to bring her again<text:span text:style-name="T86">, having his servant</text:span><text:span text:style-name="T87">H5288</text:span> with him, and a couple of asses: and she brought him into her father's house: and when the father of the damsel saw him, he rejoiced to meet him.<text:line-break/><text:span text:style-name="T87">9</text:span> And when the man rose up to depart, he, and his concubine<text:span text:style-name="T86">, and his servant</text:span><text:span text:style-name="T87">H5288</text:span>, his father in law, the damsel's father, said unto him, Behold, now the day draweth toward evening, I pray you tarry all night: behold, the day groweth to an end, lodge here, that thine heart may be merry; and to morrow get you early on your way, that thou mayest go home.<text:line-break/><text:span text:style-name="T87">11</text:span> <text:span text:style-name="T88">And</text:span> when they <text:span text:style-name="T88">were</text:span> by Jebus, the day was far spent<text:span text:style-name="T86">; and the servant</text:span><text:span text:style-name="T87">H5288</text:span> said unto <text:span text:style-name="T93">his</text:span> master, Come, I pray thee, and let us turn in into this city of the Jebusites, and lodge in it.<text:line-break/><text:span text:style-name="T87">12</text:span> And his master said unto him, We will not turn aside hither into the city of a stranger, that <text:span text:style-name="T88">is</text:span> not of the children of Israel; we will pass over to Gibeah.<text:line-break/><text:span text:style-name="T87">13</text:span> And he said <text:span text:style-name="T86">unto his servant</text:span><text:span text:style-name="T87">H5288</text:span>, Come, and let us draw near to one of these places to lodge all night, in Gibeah, or in Ramah.<text:line-break/><text:span text:style-name="T87">19</text:span> Yet there is both straw and provender for our asses; and there is bread and wine also for me, and for thy handmaid<text:span text:style-name="T86">, and for the young man</text:span><text:span text:style-name="T87">H5288</text:span> <text:span text:style-name="T88">which is</text:span> with thy servants: <text:span text:style-name="T88">there is</text:span> no want of any thing.</text:p>
          </table:table-cell>
        </table:table-row>
        <table:table-row table:style-name="Table11.1">
          <table:table-cell table:style-name="Table11.A2" office:value-type="string">
            <text:p text:style-name="P82">1 Samuel 2:33</text:p>
            <text:p text:style-name="P83">(this part of God’s judgment against the house of Eli was specifically against the males)</text:p>
            <text:p text:style-name="P83"/>
            <text:p text:style-name="P84">And the <text:span text:style-name="T86">man</text:span><text:span text:style-name="T94">H376</text:span> of thine, whom I shall not cut off from mine altar, shall be to consume thine eyes, and to grieve thine heart: and all the increase of thine house shall die <text:span text:style-name="T86">in the flower of their age</text:span><text:span text:style-name="T87">H582</text:span>.</text:p>
          </table:table-cell>
        </table:table-row>
        <table:table-row table:style-name="Table11.1">
          <table:table-cell table:style-name="Table11.A2" office:value-type="string">
            <text:p text:style-name="P85">Genesis 37:28</text:p>
            <text:p text:style-name="P86">(<text:span text:style-name="T95">a primitive root H5503 cannot be an adjunct to a noun H582, nor can it be a noun itself. Regardless, and independent of that, because of the English we can conclude that the merchant</text:span><text:span text:style-name="T96">men</text:span><text:span text:style-name="T95"> </text:span><text:span text:style-name="T97">written</text:span><text:span text:style-name="T98"> of </text:span><text:span text:style-name="T95">were male</text:span>)</text:p>
            <text:p text:style-name="P86"/>
            <text:p text:style-name="Table_20_Contents">Then there passed by Midianites <text:span text:style-name="T86">merchantmen</text:span><text:span text:style-name="T99">H582 H5503 H8802</text:span>; and they drew and lifted up Joseph out of the pit, and sold Joseph to the Ishmeelites for twenty pieces of silver: and they brought Joseph into Egypt.</text:p>
          </table:table-cell>
        </table:table-row>
        <table:table-row table:style-name="Table11.1">
          <table:table-cell table:style-name="Table11.A2" office:value-type="string">
            <text:p text:style-name="P87">Genesis 37:19</text:p>
            <text:p text:style-name="P88">(<text:span text:style-name="T100">What Joseph’s brethren called him </text:span><text:span text:style-name="T101">was</text:span><text:span text:style-name="T100"> more derogatory than it might appear: “master/</text:span><text:span text:style-name="T102">captain</text:span><text:span text:style-name="T100"> dreamer”. </text:span><text:span text:style-name="T103">Moreover, </text:span><text:span text:style-name="T104">H1167 is specifically male.</text:span>)</text:p>
            <text:p text:style-name="P88"/>
            <text:p text:style-name="Table_20_Contents">And they said one to another, Behold, this <text:span text:style-name="T86">dreamer</text:span><text:span text:style-name="T105">H1167 H2472</text:span> cometh.</text:p>
          </table:table-cell>
        </table:table-row>
        <table:table-row table:style-name="Table11.1">
          <table:table-cell table:style-name="Table11.A2" office:value-type="string">
            <text:p text:style-name="P89">Exodus 21:28-29</text:p>
            <text:p text:style-name="P90">(the <text:span text:style-name="T106">male</text:span> owner)</text:p>
            <text:p text:style-name="P90"><text:span text:style-name="T107"><text:line-break/></text:span><text:span text:style-name="T87">28</text:span> If <text:span text:style-name="T108">an ox</text:span> gore a man or a woman, that they die: then <text:span text:style-name="T108">the ox</text:span> shall be surely stoned, and <text:span text:style-name="T108">his</text:span> flesh shall not be eaten<text:span text:style-name="T86">; but the owner</text:span><text:span text:style-name="T87">H1167</text:span> of <text:span text:style-name="T108">the ox</text:span> shall be quit.<text:line-break/><text:span text:style-name="T87">29</text:span> But if <text:span text:style-name="T108">the ox</text:span> were wont to push with <text:span text:style-name="T108">his</text:span> horn in time past, and it hath been testified to <text:span text:style-name="T108">his</text:span> <text:span text:style-name="T86">owner</text:span><text:span text:style-name="T87">H1167</text:span>, and <text:span text:style-name="T93">he</text:span> hath not kept <text:span text:style-name="T108">him</text:span> in, but that <text:span text:style-name="T108">he</text:span> hath killed a man or a woman; <text:span text:style-name="T108">the ox</text:span> shall be stoned, and <text:span text:style-name="T108">his</text:span> <text:span text:style-name="T86">owner</text:span><text:span text:style-name="T87">H1167</text:span> also shall be put to death.</text:p>
          </table:table-cell>
        </table:table-row>
        <table:table-row table:style-name="Table11.1">
          <table:table-cell table:style-name="Table11.A2" office:value-type="string">
            <text:p text:style-name="P91">Job 4:17</text:p>
            <text:p text:style-name="P92">(<text:span text:style-name="T109">interestingly, Job refers to </text:span><text:span text:style-name="T110">specifically </text:span><text:span text:style-name="T109">males, </text:span><text:span text:style-name="T111">two different ways</text:span><text:span text:style-name="T109">)</text:span></text:p>
            <text:p text:style-name="P92"/>
            <text:p text:style-name="Table_20_Contents"><text:span text:style-name="T86">Shall mortal man</text:span><text:span text:style-name="T112">H582</text:span> be more just than God? <text:span text:style-name="T86">shall a man</text:span><text:span text:style-name="T87">H1397</text:span> be more pure than his maker?</text:p>
          </table:table-cell>
        </table:table-row>
        <table:table-row table:style-name="Table11.1">
          <table:table-cell table:style-name="Table11.A2" office:value-type="string">
            <text:p text:style-name="P93">Job 12:10</text:p>
            <text:p text:style-name="P94">(<text:span text:style-name="T113">Here, H376 i</text:span><text:span text:style-name="T114">s</text:span><text:span text:style-name="T113"> an adjunct to H1320 </text:span><text:span text:style-name="T115">(made obvious by the English) </text:span><text:span text:style-name="T116">and </text:span><text:span text:style-name="T117">likewise </text:span><text:span text:style-name="T118">the</text:span><text:span text:style-name="T116"> Hebrew </text:span><text:span text:style-name="T117">reads</text:span><text:span text:style-name="T113"> “flesh of man”. </text:span><text:span text:style-name="T119">Because the male “man” here is adjunct and not the complement, it does not </text:span><text:span text:style-name="T120">mean</text:span><text:span text:style-name="T119"> male only</text:span><text:span text:style-name="T121">)</text:span></text:p>
            <text:p text:style-name="P94"/>
            <text:p text:style-name="P95">In whose hand is the soul of every living thing, and the breath <text:span text:style-name="T86">of all mankind</text:span><text:span text:style-name="T122">H1320 H376</text:span>.</text:p>
          </table:table-cell>
        </table:table-row>
        <text:soft-page-break/>
        <table:table-row table:style-name="Table11.1">
          <table:table-cell table:style-name="Table11.A2" office:value-type="string">
            <text:p text:style-name="P96">Exodus 21:22</text:p>
            <text:p text:style-name="Table_20_Contents">(H582: male, H3206: male and/or female)</text:p>
            <text:p text:style-name="Table_20_Contents"/>
            <text:p text:style-name="Table_20_Contents">If <text:span text:style-name="T86">men</text:span><text:span text:style-name="T123">H582</text:span> strive, and hurt a woman with child, <text:span text:style-name="T86">so that her fruit</text:span><text:span text:style-name="T87">H3206</text:span> depart from her, and yet no mischief follow: he shall be surely punished, according as the woman's husband will lay upon him; and he shall pay as the judges determine.</text:p>
          </table:table-cell>
        </table:table-row>
        <table:table-row table:style-name="Table11.1">
          <table:table-cell table:style-name="Table11.A2" office:value-type="string">
            <text:p text:style-name="P97">Genesis 30:26</text:p>
            <text:p text:style-name="P98">(Dinah was born before Jacob said this)</text:p>
            <text:p text:style-name="P98"/>
            <text:p text:style-name="P99">Give me my wives <text:span text:style-name="T86">and my children</text:span><text:span text:style-name="T87">H3206</text:span>, for whom I have served thee, and let me go: for thou knowest my service which I have done thee.</text:p>
          </table:table-cell>
        </table:table-row>
        <table:table-row table:style-name="Table11.1">
          <table:table-cell table:style-name="Table11.A2" office:value-type="string">
            <text:p text:style-name="P100">Leviticus 18:22</text:p>
            <text:p text:style-name="P101">(“<text:span text:style-name="T124">Thou” here is the “children of Israel from verses 1 &amp; 2. This </text:span>mankind i<text:span text:style-name="T124">s</text:span> male <text:span text:style-name="T124">only </text:span><text:span text:style-name="T125">because of H2145</text:span>)</text:p>
            <text:p text:style-name="P101"/>
            <text:p text:style-name="P102"><text:span text:style-name="T93">Thou</text:span> shalt not lie <text:span text:style-name="T86">with mankind</text:span><text:span text:style-name="T87">H2145</text:span>, as with womankind: it is abomination.</text:p>
          </table:table-cell>
        </table:table-row>
        <table:table-row table:style-name="Table11.1">
          <table:table-cell table:style-name="Table11.A2" office:value-type="string">
            <text:p text:style-name="P103">Leviticus 20:13</text:p>
            <text:p text:style-name="Table_20_Contents">(both <text:span text:style-name="T126">are </text:span>male <text:span text:style-name="T126">only</text:span>)</text:p>
            <text:p text:style-name="P104"/>
            <text:p text:style-name="P102">If a <text:span text:style-name="T86">man</text:span><text:span text:style-name="T127">H376</text:span> also lie with <text:span text:style-name="T86">mankind</text:span><text:span text:style-name="T127">H2145</text:span>, as he lieth with a woman, both of them have committed an abomination: they shall surely be put to death; their blood shall be upon them.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 Nerd Font" svg:font-family="'Gabriela Nerd Font'" style:font-pitch="variable"/>
    <style:font-face style:name="Galaxie Unicode Hebrew" svg:font-family="'Galaxie Unicode Hebr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402in" fo:margin-bottom="0.1402in" fo:margin-left="0.1402in" fo:margin-right="0.1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07:49:59.513813300</meta:creation-date>
    <meta:editing-duration>P1DT6H22M34S</meta:editing-duration>
    <meta:editing-cycles>381</meta:editing-cycles>
    <meta:generator>LibreOffice/26.2.4.2$Linux_X86_64 LibreOffice_project/64a984c51f4702dbd3710b13428c673a2f1292e7</meta:generator>
    <dc:title>Men does not always mean male</dc:title>
    <dc:date>2026-07-11T12:30:26.915282608</dc:date>
    <meta:print-date>2025-06-14T17:13:31.260437100</meta:print-date>
    <meta:printed-by>PDF files</meta:printed-by>
    <meta:document-statistic meta:table-count="2" meta:image-count="0" meta:object-count="0" meta:page-count="3" meta:paragraph-count="150" meta:word-count="1343" meta:character-count="7482" meta:non-whitespace-character-count="6285"/>
    <meta:template xlink:type="simple" xlink:actuate="onRequest" xlink:title="BibleStudyTemplate" xlink:href="../../../../AppData/Roaming/LibreOffice/4/user/template/BibleStudyTemplate.ott" meta:date="2025-06-09T07:49:58.543205100"/>
  </office:meta>
</office:document-meta>
</file>