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0.275in" style:rel-column-width="2197*"/>
    </style:style>
    <style:style style:name="Table3.B" style:family="table-column">
      <style:table-column-properties style:column-width="0.891in" style:rel-column-width="7119*"/>
    </style:style>
    <style:style style:name="Table3.C" style:family="table-column">
      <style:table-column-properties style:column-width="2.4944in" style:rel-column-width="19937*"/>
    </style:style>
    <style:style style:name="Table3.D" style:family="table-column">
      <style:table-column-properties style:column-width="0.3139in" style:rel-column-width="2508*"/>
    </style:style>
    <style:style style:name="Table3.E" style:family="table-column">
      <style:table-column-properties style:column-width="0.9417in" style:rel-column-width="7524*"/>
    </style:style>
    <style:style style:name="Table3.F" style:family="table-column">
      <style:table-column-properties style:column-width="3.2847in" style:rel-column-width="2625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e7417" officeooo:paragraph-rsid="003e7417"/>
    </style:style>
    <style:style style:name="P2" style:family="paragraph" style:parent-style-name="Text_20_body">
      <style:text-properties officeooo:rsid="0047472b" officeooo:paragraph-rsid="0047472b"/>
    </style:style>
    <style:style style:name="P3" style:family="paragraph" style:parent-style-name="Standard">
      <style:text-properties officeooo:rsid="0062ad1b" officeooo:paragraph-rsid="0062ad1b"/>
    </style:style>
    <style:style style:name="P4" style:family="paragraph" style:parent-style-name="Table_20_Contents">
      <style:text-properties fo:color="#127622" loext:opacity="100%" officeooo:paragraph-rsid="001cbcc0"/>
    </style:style>
    <style:style style:name="P5" style:family="paragraph" style:parent-style-name="Table_20_Contents">
      <style:text-properties officeooo:paragraph-rsid="001cbcc0"/>
    </style:style>
    <style:style style:name="P6" style:family="paragraph" style:parent-style-name="Text_20_body">
      <style:text-properties officeooo:rsid="006f662b" officeooo:paragraph-rsid="006f662b"/>
    </style:style>
    <style:style style:name="P7" style:family="paragraph" style:parent-style-name="Standard">
      <style:text-properties fo:color="#127622" loext:opacity="100%" fo:font-size="12pt" officeooo:rsid="006c3963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color="#127622" loext:opacity="100%" fo:font-size="12pt" officeooo:paragraph-rsid="006a8f71" style:font-size-asian="12pt" style:font-size-complex="12pt"/>
    </style:style>
    <style:style style:name="P10" style:family="paragraph" style:parent-style-name="Standard">
      <style:text-properties fo:font-size="12pt" officeooo:paragraph-rsid="006a8f71" style:font-size-asian="12pt" style:font-size-complex="12pt"/>
    </style:style>
    <style:style style:name="P11" style:family="paragraph" style:parent-style-name="Text_20_body">
      <style:text-properties officeooo:rsid="007e6dad" officeooo:paragraph-rsid="00800d1e"/>
    </style:style>
    <style:style style:name="P12" style:family="paragraph" style:parent-style-name="Standard">
      <style:text-properties officeooo:rsid="0086aaee" officeooo:paragraph-rsid="0086aaee"/>
    </style:style>
    <style:style style:name="P13" style:family="paragraph" style:parent-style-name="Table_20_Contents">
      <style:text-properties officeooo:rsid="0021dbb3" officeooo:paragraph-rsid="003d7648"/>
    </style:style>
    <style:style style:name="P14" style:family="paragraph" style:parent-style-name="Table_20_Contents">
      <style:text-properties officeooo:paragraph-rsid="003d7648"/>
    </style:style>
    <style:style style:name="P15" style:family="paragraph" style:parent-style-name="Table_20_Contents">
      <style:text-properties officeooo:rsid="0023b84e" officeooo:paragraph-rsid="003d7648"/>
    </style:style>
    <style:style style:name="P16" style:family="paragraph" style:parent-style-name="Table_20_Contents">
      <style:text-properties officeooo:rsid="002ca777" officeooo:paragraph-rsid="003d7648"/>
    </style:style>
    <style:style style:name="P17" style:family="paragraph" style:parent-style-name="Table_20_Contents">
      <style:text-properties officeooo:rsid="0024db62" officeooo:paragraph-rsid="003d7648"/>
    </style:style>
    <style:style style:name="P18" style:family="paragraph" style:parent-style-name="Table_20_Contents">
      <style:text-properties officeooo:rsid="002db93d" officeooo:paragraph-rsid="003d7648"/>
    </style:style>
    <style:style style:name="P19" style:family="paragraph" style:parent-style-name="Table_20_Contents">
      <style:text-properties officeooo:rsid="00260a5e" officeooo:paragraph-rsid="003d7648"/>
    </style:style>
    <style:style style:name="P20" style:family="paragraph" style:parent-style-name="Table_20_Contents">
      <style:text-properties officeooo:rsid="003126f0" officeooo:paragraph-rsid="003d7648"/>
    </style:style>
    <style:style style:name="P21" style:family="paragraph" style:parent-style-name="Table_20_Contents">
      <style:text-properties officeooo:rsid="00278968" officeooo:paragraph-rsid="003d7648"/>
    </style:style>
    <style:style style:name="P22" style:family="paragraph" style:parent-style-name="Table_20_Contents">
      <style:text-properties officeooo:rsid="00335bfa" officeooo:paragraph-rsid="003d7648"/>
    </style:style>
    <style:style style:name="P23" style:family="paragraph" style:parent-style-name="Table_20_Contents">
      <style:text-properties officeooo:rsid="00286a47" officeooo:paragraph-rsid="003d7648"/>
    </style:style>
    <style:style style:name="P24" style:family="paragraph" style:parent-style-name="Table_20_Contents">
      <style:text-properties officeooo:rsid="0034e211" officeooo:paragraph-rsid="003d7648"/>
    </style:style>
    <style:style style:name="P25" style:family="paragraph" style:parent-style-name="Table_20_Contents">
      <style:text-properties officeooo:rsid="002a2476" officeooo:paragraph-rsid="003d7648"/>
    </style:style>
    <style:style style:name="P26" style:family="paragraph" style:parent-style-name="Table_20_Contents">
      <style:text-properties officeooo:rsid="0035dda5" officeooo:paragraph-rsid="003d7648"/>
    </style:style>
    <style:style style:name="P27" style:family="paragraph" style:parent-style-name="Table_20_Contents">
      <style:text-properties officeooo:rsid="002b7478" officeooo:paragraph-rsid="003d7648"/>
    </style:style>
    <style:style style:name="P28" style:family="paragraph" style:parent-style-name="Table_20_Contents">
      <style:text-properties officeooo:rsid="0036f02d" officeooo:paragraph-rsid="003d7648"/>
    </style:style>
    <style:style style:name="P29" style:family="paragraph" style:parent-style-name="Table_20_Contents">
      <style:text-properties officeooo:rsid="00374775" officeooo:paragraph-rsid="003d7648"/>
    </style:style>
    <style:style style:name="P30" style:family="paragraph" style:parent-style-name="Standard">
      <style:text-properties officeooo:paragraph-rsid="003d76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823c84"/>
    </style:style>
    <style:style style:name="T4" style:family="text">
      <style:text-properties officeooo:rsid="0051b193"/>
    </style:style>
    <style:style style:name="T5" style:family="text">
      <style:text-properties fo:font-style="italic" officeooo:rsid="0051b193" style:font-style-asian="italic" style:font-style-complex="italic"/>
    </style:style>
    <style:style style:name="T6" style:family="text">
      <style:text-properties fo:font-style="normal" officeooo:rsid="0051b193" style:font-style-asian="normal" style:font-style-complex="normal"/>
    </style:style>
    <style:style style:name="T7" style:family="text">
      <style:text-properties fo:font-style="normal" officeooo:rsid="005250ca" style:font-style-asian="normal" style:font-style-complex="normal"/>
    </style:style>
    <style:style style:name="T8" style:family="text">
      <style:text-properties fo:font-style="normal" officeooo:rsid="005f6881" style:font-style-asian="normal" style:font-style-complex="normal"/>
    </style:style>
    <style:style style:name="T9" style:family="text">
      <style:text-properties fo:font-style="normal" officeooo:rsid="0055069a" style:font-style-asian="normal" style:font-style-complex="normal"/>
    </style:style>
    <style:style style:name="T10" style:family="text">
      <style:text-properties fo:color="#127622" loext:opacity="100%" fo:font-style="normal" officeooo:rsid="00678a30" style:font-style-asian="normal" style:font-style-complex="normal"/>
    </style:style>
    <style:style style:name="T11" style:family="text">
      <style:text-properties fo:color="#127622" loext:opacity="100%" fo:font-style="normal" officeooo:rsid="0082ebe3" style:font-style-asian="normal" style:font-style-complex="normal"/>
    </style:style>
    <style:style style:name="T12" style:family="text">
      <style:text-properties officeooo:rsid="0049dee6"/>
    </style:style>
    <style:style style:name="T13" style:family="text">
      <style:text-properties fo:font-style="italic" officeooo:rsid="0049dee6" style:font-style-asian="italic" style:font-style-complex="italic"/>
    </style:style>
    <style:style style:name="T14" style:family="text">
      <style:text-properties officeooo:rsid="0047e58d"/>
    </style:style>
    <style:style style:name="T15" style:family="text">
      <style:text-properties officeooo:rsid="004bdb25"/>
    </style:style>
    <style:style style:name="T16" style:family="text">
      <style:text-properties fo:font-style="italic" officeooo:rsid="003ef586" style:font-style-asian="italic" style:font-style-complex="italic"/>
    </style:style>
    <style:style style:name="T17" style:family="text">
      <style:text-properties fo:font-style="italic" officeooo:rsid="0044e8af" style:font-style-asian="italic" style:font-style-complex="italic"/>
    </style:style>
    <style:style style:name="T18" style:family="text">
      <style:text-properties officeooo:rsid="003ef586"/>
    </style:style>
    <style:style style:name="T19" style:family="text">
      <style:text-properties fo:font-style="italic" officeooo:rsid="0040dd13" style:font-style-asian="italic" style:font-style-complex="italic"/>
    </style:style>
    <style:style style:name="T20" style:family="text">
      <style:text-properties officeooo:rsid="0040dd13"/>
    </style:style>
    <style:style style:name="T21" style:family="text">
      <style:text-properties officeooo:rsid="0040e131"/>
    </style:style>
    <style:style style:name="T22" style:family="text">
      <style:text-properties fo:font-style="italic" officeooo:rsid="004284a8" style:font-style-asian="italic" style:font-style-complex="italic"/>
    </style:style>
    <style:style style:name="T23" style:family="text">
      <style:text-properties officeooo:rsid="004284a8"/>
    </style:style>
    <style:style style:name="T24" style:family="text">
      <style:text-properties fo:font-style="italic" officeooo:rsid="00437055" style:font-style-asian="italic" style:font-style-complex="italic"/>
    </style:style>
    <style:style style:name="T25" style:family="text">
      <style:text-properties officeooo:rsid="00437055"/>
    </style:style>
    <style:style style:name="T26" style:family="text">
      <style:text-properties officeooo:rsid="004c7168"/>
    </style:style>
    <style:style style:name="T27" style:family="text">
      <style:text-properties fo:font-style="italic" officeooo:rsid="0045e8dd" style:font-style-asian="italic" style:font-style-complex="italic"/>
    </style:style>
    <style:style style:name="T28" style:family="text">
      <style:text-properties officeooo:rsid="0045e8dd"/>
    </style:style>
    <style:style style:name="T29" style:family="text">
      <style:text-properties officeooo:rsid="00473654"/>
    </style:style>
    <style:style style:name="T30" style:family="text">
      <style:text-properties fo:font-style="italic" officeooo:rsid="00473654" style:font-style-asian="italic" style:font-style-complex="italic"/>
    </style:style>
    <style:style style:name="T31" style:family="text">
      <style:text-properties fo:color="#127622" loext:opacity="100%"/>
    </style:style>
    <style:style style:name="T32" style:family="text">
      <style:text-properties fo:color="#127622" loext:opacity="100%" officeooo:rsid="004cc533"/>
    </style:style>
    <style:style style:name="T33" style:family="text">
      <style:text-properties style:text-position="33% 80%"/>
    </style:style>
    <style:style style:name="T34" style:family="text">
      <style:text-properties fo:font-style="italic"/>
    </style:style>
    <style:style style:name="T35" style:family="text">
      <style:text-properties fo:background-color="#ffd7d7" loext:char-shading-value="0"/>
    </style:style>
    <style:style style:name="T36" style:family="text">
      <style:text-properties fo:background-color="#b4c7dc" loext:char-shading-value="0"/>
    </style:style>
    <style:style style:name="T37" style:family="text">
      <style:text-properties fo:background-color="#dde8cb" loext:char-shading-value="0"/>
    </style:style>
    <style:style style:name="T38" style:family="text">
      <style:text-properties fo:background-color="#ffa6a6" loext:char-shading-value="0"/>
    </style:style>
    <style:style style:name="T39" style:family="text">
      <style:text-properties fo:background-color="#ffde59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style="italic" fo:background-color="#ffff00" loext:char-shading-value="0"/>
    </style:style>
    <style:style style:name="T43" style:family="text">
      <style:text-properties fo:font-style="italic" fo:font-weight="bold" fo:background-color="#ffff00" loext:char-shading-value="0" style:font-weight-asian="bold" style:font-weight-complex="bold"/>
    </style:style>
    <style:style style:name="T44" style:family="text">
      <style:text-properties officeooo:rsid="0064206f"/>
    </style:style>
    <style:style style:name="T45" style:family="text">
      <style:text-properties officeooo:rsid="00682342"/>
    </style:style>
    <style:style style:name="T46" style:family="text">
      <style:text-properties style:use-window-font-color="true" loext:opacity="0%" fo:font-size="10pt" style:font-size-asian="10pt" style:font-size-complex="10pt"/>
    </style:style>
    <style:style style:name="T47" style:family="text">
      <style:text-properties style:use-window-font-color="true" loext:opacity="0%" fo:font-size="10pt" officeooo:rsid="005b4aeb" style:font-size-asian="10pt" style:font-size-complex="10pt"/>
    </style:style>
    <style:style style:name="T48" style:family="text">
      <style:text-properties fo:color="#127622" loext:opacity="100%" fo:font-size="10pt" officeooo:rsid="005b4aeb" style:font-size-asian="10pt" style:font-size-complex="10pt"/>
    </style:style>
    <style:style style:name="T49" style:family="text">
      <style:text-properties style:use-window-font-color="true" loext:opacity="0%" fo:font-size="10pt" officeooo:rsid="005cea14" style:font-size-asian="10pt" style:font-size-complex="10pt"/>
    </style:style>
    <style:style style:name="T50" style:family="text">
      <style:text-properties fo:font-style="italic" fo:background-color="#ffde59" loext:char-shading-value="0"/>
    </style:style>
    <style:style style:name="T51" style:family="text">
      <style:text-properties fo:color="#127622" loext:opacity="100%" officeooo:rsid="0066b915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fo:font-size="10pt" officeooo:rsid="00569160" style:font-size-asian="10pt" style:font-size-complex="10pt"/>
    </style:style>
    <style:style style:name="T54" style:family="text">
      <style:text-properties fo:color="#127622" loext:opacity="100%" fo:font-size="10pt" officeooo:rsid="00569160" style:font-size-asian="10pt" style:font-size-complex="10pt"/>
    </style:style>
    <style:style style:name="T55" style:family="text">
      <style:text-properties fo:color="#127622" loext:opacity="100%" fo:font-size="10pt" officeooo:rsid="0056e896" style:font-size-asian="10pt" style:font-size-complex="10pt"/>
    </style:style>
    <style:style style:name="T56" style:family="text">
      <style:text-properties fo:color="#127622" loext:opacity="100%" fo:font-size="10pt" officeooo:rsid="0057318d" style:font-size-asian="10pt" style:font-size-complex="10pt"/>
    </style:style>
    <style:style style:name="T57" style:family="text">
      <style:text-properties fo:color="#127622" loext:opacity="100%" fo:font-size="10pt" officeooo:rsid="0058a68d" style:font-size-asian="10pt" style:font-size-complex="10pt"/>
    </style:style>
    <style:style style:name="T58" style:family="text">
      <style:text-properties fo:color="#127622" loext:opacity="100%" fo:font-size="10pt" officeooo:rsid="0058dd48" style:font-size-asian="10pt" style:font-size-complex="10pt"/>
    </style:style>
    <style:style style:name="T59" style:family="text">
      <style:text-properties style:use-window-font-color="true" loext:opacity="0%" fo:font-size="10pt" officeooo:rsid="0058dd48" style:font-size-asian="10pt" style:font-size-complex="10pt"/>
    </style:style>
    <style:style style:name="T60" style:family="text">
      <style:text-properties fo:font-weight="bold" fo:background-color="#ffde59" loext:char-shading-value="0" style:font-weight-asian="bold" style:font-weight-complex="bold"/>
    </style:style>
    <style:style style:name="T61" style:family="text">
      <style:text-properties officeooo:rsid="00710b78"/>
    </style:style>
    <style:style style:name="T62" style:family="text">
      <style:text-properties officeooo:rsid="00727d22"/>
    </style:style>
    <style:style style:name="T63" style:family="text">
      <style:text-properties officeooo:rsid="0072c732"/>
    </style:style>
    <style:style style:name="T64" style:family="text">
      <style:text-properties officeooo:rsid="00740252"/>
    </style:style>
    <style:style style:name="T65" style:family="text">
      <style:text-properties officeooo:rsid="00741a6f"/>
    </style:style>
    <style:style style:name="T66" style:family="text">
      <style:text-properties fo:color="#127622" loext:opacity="100%" officeooo:rsid="00741a6f"/>
    </style:style>
    <style:style style:name="T67" style:family="text">
      <style:text-properties fo:color="#127622" loext:opacity="100%" officeooo:rsid="007b841c"/>
    </style:style>
    <style:style style:name="T68" style:family="text">
      <style:text-properties fo:background-color="#ffdbb6" loext:char-shading-value="0"/>
    </style:style>
    <style:style style:name="T69" style:family="text">
      <style:text-properties fo:color="#0000ff" loext:opacity="100%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6a8f71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8519aa" style:font-style-asian="normal" style:font-style-complex="normal"/>
    </style:style>
    <style:style style:name="T75" style:family="text">
      <style:text-properties officeooo:rsid="0088aa45"/>
    </style:style>
    <style:style style:name="T76" style:family="text">
      <style:text-properties officeooo:rsid="0089f51f"/>
    </style:style>
    <style:style style:name="T77" style:family="text">
      <style:text-properties officeooo:rsid="003b43d1"/>
    </style:style>
    <style:style style:name="T78" style:family="text">
      <style:text-properties officeooo:rsid="002ce6c7"/>
    </style:style>
    <style:style style:name="T79" style:family="text">
      <style:text-properties officeooo:rsid="003099c3"/>
    </style:style>
    <style:style style:name="T80" style:family="text">
      <style:text-properties officeooo:rsid="0028e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OT we see 24 <text:span text:style-name="T1">governors</text:span><text:span text:style-name="T2">H8269 </text:span>of the sanctuary/house of God <text:span text:style-name="T3">chosen</text:span><text:span text:style-name="T4"> </text:span><text:span text:style-name="T5">by lot</text:span><text:span text:style-name="T6"> </text:span><text:span text:style-name="T7">(</text:span><text:span text:style-name="T8">by </text:span><text:span text:style-name="T9">the LORD, </text:span><text:span text:style-name="T10">Pro</text:span><text:span text:style-name="T11">v</text:span><text:span text:style-name="T10"> 16:33</text:span><text:span text:style-name="T7">).</text:span></text:p>
      <text:p text:style-name="P2">The Hebrew word <text:span text:style-name="T12">behind </text:span><text:span text:style-name="T13">governors</text:span><text:span text:style-name="T12">,</text:span> שַׂר <text:span text:style-name="T14">(sar), which was codified as </text:span>H8269, is translated elsewhere in the KJ<text:span text:style-name="T15">B</text:span> as <text:span text:style-name="T16">prince</text:span><text:span text:style-name="T17">(</text:span><text:span text:style-name="T16">s</text:span><text:span text:style-name="T17">)</text:span><text:span text:style-name="T18">, </text:span><text:span text:style-name="T16">chief captain</text:span><text:span text:style-name="T18">, </text:span><text:span text:style-name="T16">keeper</text:span><text:span text:style-name="T18">, </text:span><text:span text:style-name="T16">captain</text:span><text:span text:style-name="T17">(s)</text:span><text:span text:style-name="T18">, </text:span><text:span text:style-name="T16">rulers</text:span><text:span text:style-name="T18">, </text:span><text:span text:style-name="T19">chief</text:span><text:span text:style-name="T20">, </text:span><text:span text:style-name="T19">prince</text:span><text:span text:style-name="T20">, </text:span><text:span text:style-name="T19">lord</text:span><text:span text:style-name="T20">, </text:span><text:span text:style-name="T19">general</text:span><text:span text:style-name="T20"> [of the king’s army</text:span><text:span text:style-name="T21">], </text:span><text:span text:style-name="T22">stewards</text:span><text:span text:style-name="T23">, </text:span><text:span text:style-name="T24">principal</text:span><text:span text:style-name="T25"> </text:span><text:span text:style-name="T26">[scribe of the host]</text:span><text:span text:style-name="T25">, </text:span><text:span text:style-name="T27">taskmasters</text:span><text:span text:style-name="T28">, </text:span><text:span text:style-name="T29">the </text:span><text:span text:style-name="T30">master</text:span><text:span text:style-name="T29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1">1 Chronicles 24:1-1</text:span><text:span text:style-name="T32">8</text:span><text:line-break/><text:span text:style-name="T33">1</text:span> Now <text:span text:style-name="T34">these are</text:span> the divisions of the sons of Aaron. The sons of <text:span text:style-name="T35">Aaron</text:span>; Nadab, and Abihu, <text:span text:style-name="T36">Eleazar</text:span>, and <text:span text:style-name="T37">Ithamar</text:span>.<text:line-break/><text:span text:style-name="T33">2</text:span> But Nadab and Abihu died before their father, and had no children: therefore <text:span text:style-name="T36">Eleazar</text:span> and <text:span text:style-name="T37">Ithamar</text:span> executed the priest's office. <text:line-break/><text:span text:style-name="T33">3</text:span> And David distributed them, both <text:span text:style-name="T36">Zadok</text:span> of the sons of <text:span text:style-name="T36">Eleazar</text:span>, and <text:span text:style-name="T37">Ahimelech</text:span> of the sons of <text:span text:style-name="T37">Ithamar</text:span>, according to their offices in their service. <text:line-break/><text:span text:style-name="T33">4</text:span> And there were more chief men found of the sons of <text:span text:style-name="T36">Eleazar</text:span> than of the sons of <text:span text:style-name="T37">Ithamar</text:span>; and <text:span text:style-name="T34">thus</text:span> were they divided. Among the sons of Eleazar <text:span text:style-name="T34">there were</text:span> <text:span text:style-name="T36">sixteen</text:span> chief men of the house of <text:span text:style-name="T34">their</text:span> fathers, and <text:span text:style-name="T37">eight</text:span> among the sons of <text:span text:style-name="T37">Ithamar</text:span> according to the house of their fathers. <text:line-break/><text:span text:style-name="T33">5</text:span> Thus were they <text:span text:style-name="T38">divided by lot</text:span>, one sort with another; for the <text:span text:style-name="T39">governors</text:span><text:span text:style-name="T40"> of the </text:span><text:span text:style-name="T41">sanctuary</text:span>, and <text:span text:style-name="T39">governors</text:span><text:span text:style-name="T40"> </text:span><text:span text:style-name="T42">of the </text:span><text:span text:style-name="T43">house</text:span><text:span text:style-name="T41"> of God</text:span>, were of the sons of <text:span text:style-name="T36">Eleazar</text:span>, and of the sons of <text:span text:style-name="T37">Ithamar</text:span>. <text:line-break/><text:span text:style-name="T33">6</text:span> And Shemaiah the son of Nethaneel the scribe, <text:span text:style-name="T34">one</text:span> of the Levites, wrote them before the king, and the princes, and <text:span text:style-name="T36">Zadok</text:span> the priest, and <text:span text:style-name="T37">Ahimelech</text:span> the son of <text:span text:style-name="T37">Abiathar</text:span>, and <text:span text:style-name="T34">before</text:span> the chief of the fathers of the priests and Levites: one principal household being taken for <text:span text:style-name="T36">Eleazar</text:span>, and <text:span text:style-name="T34">one</text:span> taken for <text:span text:style-name="T37">Ithamar</text:span>. <text:line-break/><text:span text:style-name="T33">7</text:span> Now the first lot came forth to <text:span text:style-name="T40">Jehoiarib</text:span>, the second to <text:span text:style-name="T40">Jedaiah</text:span>, <text:line-break/><text:span text:style-name="T33">8</text:span> The third to <text:span text:style-name="T40">Harim</text:span>, the fourth to <text:span text:style-name="T40">Seorim</text:span>, <text:line-break/><text:span text:style-name="T33">9</text:span> The fifth to <text:span text:style-name="T40">Malchijah</text:span>, the sixth to <text:span text:style-name="T40">Mijamin</text:span>, <text:line-break/><text:span text:style-name="T33">10</text:span> The seventh to <text:span text:style-name="T40">Hakkoz</text:span>, the eighth to <text:span text:style-name="T40">Abijah</text:span>, <text:line-break/><text:span text:style-name="T33">11</text:span> The ninth to <text:span text:style-name="T40">Jeshua</text:span>, the tenth to <text:span text:style-name="T40">Shecaniah</text:span>, <text:line-break/><text:span text:style-name="T33">12</text:span> The eleventh to <text:span text:style-name="T40">Eliashib</text:span>, the twelfth to <text:span text:style-name="T40">Jakim</text:span>, <text:line-break/><text:span text:style-name="T33">13</text:span> The thirteenth to <text:span text:style-name="T40">Huppah</text:span>, the fourteenth to <text:span text:style-name="T40">Jeshebeab</text:span>, <text:line-break/><text:span text:style-name="T33">14</text:span> The fifteenth to <text:span text:style-name="T40">Bilgah</text:span>, the sixteenth to <text:span text:style-name="T40">Immer</text:span>, <text:line-break/><text:span text:style-name="T33">15</text:span> The seventeenth to <text:span text:style-name="T40">Hezir</text:span>, the eighteenth to <text:span text:style-name="T40">Aphses</text:span>, <text:line-break/><text:span text:style-name="T33">16</text:span> The nineteenth to <text:span text:style-name="T40">Pethahiah</text:span>, the twentieth to <text:span text:style-name="T40">Jehezekel</text:span>, <text:line-break/><text:span text:style-name="T33">17</text:span> The one and twentieth to <text:span text:style-name="T40">Jachin</text:span>, the two and twentieth to <text:span text:style-name="T40">Gamul</text:span>, <text:line-break/><text:span text:style-name="T33">18</text:span> The three and twentieth to <text:span text:style-name="T40">Delaiah</text:span>, the four and twentieth to <text:span text:style-name="T40">Maaziah</text:span>. </text:p>
          </table:table-cell>
        </table:table-row>
      </table:table>
      <text:p text:style-name="Standard"/>
      <text:p text:style-name="P3"><text:span text:style-name="T44">Things we see in t</text:span>he law are a shadow or a figure <text:span text:style-name="T45">(the tabernacle) </text:span>of <text:span text:style-name="T44">both things to come (the future) and of heavenly things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1">Colossians 2:16-17</text:span><text:span text:style-name="T46"> </text:span><text:span text:style-name="T47">(</text:span><text:span text:style-name="T48">Hebrews 9:9</text:span><text:span text:style-name="T49">)</text:span><text:line-break/><text:span text:style-name="T33">16</text:span> Let no man therefore judge you in meat, or in drink, or in respect of an <text:span text:style-name="T39">holyday</text:span>, or of the <text:span text:style-name="T39">new moon</text:span>, or of <text:span text:style-name="T39">the sabbath </text:span><text:span text:style-name="T50">days</text:span>:<text:line-break/><text:span text:style-name="T33">17</text:span> Which are <text:span text:style-name="T40">a shadow of </text:span><text:span text:style-name="T41">things to come</text:span>; but the body <text:span text:style-name="T34">is</text:span> of Christ.</text:p>
          </table:table-cell>
        </table:table-row>
        <table:table-row>
          <table:table-cell table:style-name="Table2.A2" office:value-type="string">
            <text:p text:style-name="Table_20_Contents"><text:span text:style-name="T31">Hebrews 8:</text:span><text:span text:style-name="T51">4,</text:span><text:span text:style-name="T31">5</text:span><text:span text:style-name="T52"> </text:span><text:span text:style-name="T53">(</text:span><text:span text:style-name="T54">Exodus 25:40, </text:span><text:span text:style-name="T55">26:30, </text:span><text:span text:style-name="T56">27:8, </text:span><text:span text:style-name="T57">Numbers 8:4, </text:span><text:span text:style-name="T58">1 Chronicles 28:12, 19, Acts 7:44</text:span><text:span text:style-name="T59">)</text:span><text:line-break/><text:span text:style-name="T33">4</text:span> For if he were on earth, he should not be a priest, seeing that there are <text:span text:style-name="T39">priests</text:span> that offer gifts according to the law:<text:line-break/><text:span text:style-name="T33">5</text:span> <text:span text:style-name="T39">Who serve</text:span> unto the <text:span text:style-name="T40">example</text:span> and <text:span text:style-name="T40">shadow</text:span> <text:span text:style-name="T60">of heavenly things</text:span>, as Moses was admonished of God when he was about to make the tabernacle: for, See, saith he, <text:span text:style-name="T34">that</text:span> thou make all things according to the pattern shewed to thee in the mount.</text:p>
          </table:table-cell>
        </table:table-row>
        <table:table-row>
          <table:table-cell table:style-name="Table2.A2" office:value-type="string">
            <text:p text:style-name="P4">Hebrews 10:1</text:p>
            <text:p text:style-name="P5">For <text:span text:style-name="T39">the law</text:span> having <text:span text:style-name="T40">a shadow of</text:span> good <text:span text:style-name="T41">things to come</text:span>, and <text:span text:style-name="T39">not the</text:span> very <text:span text:style-name="T40">image of the things</text:span>, can never with those sacrifices which they offered year by year continually make the comers thereunto perfect.</text:p>
          </table:table-cell>
        </table:table-row>
      </table:table>
      <text:p text:style-name="P6"><text:soft-page-break/>Round about the throne of God in heaven are seated 24 elders <text:span text:style-name="T61">wearing crowns </text:span><text:span text:style-name="T62">of gold. </text:span><text:span text:style-name="T63">The first four uses of the word “crown” in the Bible give the ideas of “top” or “upper”. The fifth use of the word “crown” is the “holy crown” </text:span><text:span text:style-name="T64">which is placed on the </text:span><text:span text:style-name="T65">mitre (aka diadem) on the </text:span><text:span text:style-name="T64">head of the high priest as part of the process to “hallow them, to minister unto me [God] in the priest’s office” </text:span><text:span text:style-name="T65">(</text:span><text:span text:style-name="T66">Exodus 29, </text:span><text:span text:style-name="T67">28:36-37, 39:30-31</text:span><text:span text:style-name="T65">)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Revelation 4:1</text:p>
            <text:p text:style-name="P8">After this I looked, and, behold, <text:span text:style-name="T40">a door was opened in </text:span><text:span text:style-name="T68">heaven</text:span>: and the first voice which I heard was as it were of a trumpet talking with me; which said, <text:span text:style-name="T68">Come up hither,</text:span> and I will shew thee things which must be hereafter.</text:p>
          </table:table-cell>
        </table:table-row>
        <table:table-row>
          <table:table-cell table:style-name="Table4.A2" office:value-type="string">
            <text:p text:style-name="P9">Revelation 4:4</text:p>
            <text:p text:style-name="P10">And round about <text:span text:style-name="T68">the throne</text:span> were <text:span text:style-name="T69">four</text:span> <text:span text:style-name="T69">and</text:span> <text:span text:style-name="T69">twenty</text:span> <text:span text:style-name="T70">seats</text:span>: and upon the seats I saw <text:span text:style-name="T69">four</text:span> <text:span text:style-name="T69">and</text:span> <text:span text:style-name="T69">twenty</text:span> <text:span text:style-name="T69">elders</text:span> sitting, clothed in white raiment; and they had on their heads crowns of gold.</text:p>
          </table:table-cell>
        </table:table-row>
        <table:table-row>
          <table:table-cell table:style-name="Table4.A2" office:value-type="string">
            <text:p text:style-name="P9">Revelation 4:10</text:p>
            <text:p text:style-name="P10">The <text:span text:style-name="T69">four</text:span> <text:span text:style-name="T69">and</text:span> <text:span text:style-name="T69">twenty</text:span> <text:span text:style-name="T69">elders</text:span> fall down before him that sat on the throne, and worship him that liveth for ever and ever, and cast their crowns before the throne, saying,</text:p>
          </table:table-cell>
        </table:table-row>
        <table:table-row>
          <table:table-cell table:style-name="Table4.A2" office:value-type="string">
            <text:p text:style-name="P9">Revelation 5:5</text:p>
            <text:p text:style-name="P10">And one of the <text:span text:style-name="T69">elders</text:span> saith unto me, Weep not: behold, the Lion of the tribe of Juda, the Root of David, hath prevailed to open the book, and to loose the seven seals thereof.</text:p>
          </table:table-cell>
        </table:table-row>
        <table:table-row>
          <table:table-cell table:style-name="Table4.A2" office:value-type="string">
            <text:p text:style-name="P9">Revelation 5:6</text:p>
            <text:p text:style-name="P10"><text:span text:style-name="T71">A</text:span>nd I beheld, and, lo, in the midst of the throne and of the four beasts, and in the midst of the <text:span text:style-name="T69">elders</text:span>, stood a Lamb as it had been slain, having seven horns and seven eyes, which are the seven Spirits of God sent forth into all the earth.</text:p>
          </table:table-cell>
        </table:table-row>
        <table:table-row>
          <table:table-cell table:style-name="Table4.A2" office:value-type="string">
            <text:p text:style-name="P9">Revelation 5:8</text:p>
            <text:p text:style-name="P10">And when he had taken the book, the four beasts and <text:span text:style-name="T69">four</text:span> <text:span text:style-name="T69">and</text:span> <text:span text:style-name="T69">twenty</text:span> <text:span text:style-name="T69">elders</text:span> fell down before the Lamb, having every one of them harps, and golden vials full of odours, which are the prayers of saints.</text:p>
          </table:table-cell>
        </table:table-row>
        <table:table-row>
          <table:table-cell table:style-name="Table4.A2" office:value-type="string">
            <text:p text:style-name="P9">Revelation 5:11</text:p>
            <text:p text:style-name="P10">And I beheld, and I heard the voice of many angels round about the throne and the beasts and the <text:span text:style-name="T69">elders</text:span>: and the number of them was ten thousand times ten thousand, and thousands of thousands;</text:p>
          </table:table-cell>
        </table:table-row>
        <table:table-row>
          <table:table-cell table:style-name="Table4.A2" office:value-type="string">
            <text:p text:style-name="P9">Revelation 5:14</text:p>
            <text:p text:style-name="P10">And the four beasts said, Amen. And the <text:span text:style-name="T69">four</text:span> <text:span text:style-name="T69">and</text:span> <text:span text:style-name="T69">twenty</text:span> <text:span text:style-name="T69">elders</text:span> fell down and worshipped him that liveth for ever and ever.</text:p>
          </table:table-cell>
        </table:table-row>
        <table:table-row>
          <table:table-cell table:style-name="Table4.A2" office:value-type="string">
            <text:p text:style-name="P9">Revelation 7:11</text:p>
            <text:p text:style-name="P10">And all the angels stood round about the throne, and about the <text:span text:style-name="T69">elders</text:span> and the four beasts, and fell before the throne on their faces, and worshipped God,</text:p>
          </table:table-cell>
        </table:table-row>
        <table:table-row>
          <table:table-cell table:style-name="Table4.A2" office:value-type="string">
            <text:p text:style-name="P9">Revelation 7:13</text:p>
            <text:p text:style-name="P10">And one of the <text:span text:style-name="T69">elders</text:span> answered, saying unto me, What are these which are arrayed in white robes? and whence came they?</text:p>
          </table:table-cell>
        </table:table-row>
        <table:table-row>
          <table:table-cell table:style-name="Table4.A2" office:value-type="string">
            <text:p text:style-name="P9">Revelation 11:16</text:p>
            <text:p text:style-name="P10">And the <text:span text:style-name="T69">four</text:span> <text:span text:style-name="T69">and</text:span> <text:span text:style-name="T69">twenty</text:span> <text:span text:style-name="T69">elders</text:span>, which sat before God on their seats, fell upon their faces, and worshipped God,</text:p>
          </table:table-cell>
        </table:table-row>
        <table:table-row>
          <table:table-cell table:style-name="Table4.A2" office:value-type="string">
            <text:p text:style-name="P9">Revelation 14:3</text:p>
            <text:p text:style-name="P10">And they sung as it were a new song before the throne, and before the four beasts, and the <text:span text:style-name="T69">elders</text:span>: and no man could learn that song but the hundred and forty and four thousand, which were redeemed from the earth.</text:p>
          </table:table-cell>
        </table:table-row>
        <table:table-row>
          <table:table-cell table:style-name="Table4.A2" office:value-type="string">
            <text:p text:style-name="P9">Revelation 19:4</text:p>
            <text:p text:style-name="P10">And the <text:span text:style-name="T69">four</text:span> <text:span text:style-name="T69">and</text:span> <text:span text:style-name="T69">twenty</text:span> <text:span text:style-name="T69">elders</text:span> and the four beasts fell down and worshipped God that sat on the throne, saying, Amen; Alleluia.</text:p>
          </table:table-cell>
        </table:table-row>
      </table:table>
      <text:p text:style-name="Standard"/>
      <text:p text:style-name="Standard"/>
      <text:p text:style-name="P11">Could the earthly <text:span text:style-name="T72">shadow</text:span><text:span text:style-name="T73"> of this heav</text:span><text:span text:style-name="T74">e</text:span><text:span text:style-name="T73">nly thing be the 24 governors in 1 Chronicles 24?</text:span></text:p>
      <text:p text:style-name="P11"><text:span text:style-name="T73"/></text:p>
      <text:p text:style-name="Standard"/>
      <text:p text:style-name="Standard"/>
      <text:p text:style-name="P12"><text:soft-page-break/>Bonus: the supposed meaning of the <text:span text:style-name="T75">names of the </text:span>24 governors <text:span text:style-name="T76">(many possible variations exist)</text:span>.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4">Jehoiarib</text:p>
          </table:table-cell>
          <table:table-cell table:style-name="Table3.A1" office:value-type="string">
            <text:p text:style-name="P15">Jehovah will contend</text:p>
          </table:table-cell>
          <table:table-cell table:style-name="Table3.A1" office:value-type="string">
            <text:p text:style-name="P14">13</text:p>
          </table:table-cell>
          <table:table-cell table:style-name="Table3.A1" office:value-type="string">
            <text:p text:style-name="P14">Huppah</text:p>
          </table:table-cell>
          <table:table-cell table:style-name="Table3.F1" office:value-type="string">
            <text:p text:style-name="P16">Chamber, closet, defence (ceil, cover, overlay)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4">Jedaiah</text:p>
          </table:table-cell>
          <table:table-cell table:style-name="Table3.A2" office:value-type="string">
            <text:p text:style-name="P15">Jah has known</text:p>
          </table:table-cell>
          <table:table-cell table:style-name="Table3.A2" office:value-type="string">
            <text:p text:style-name="P14">14</text:p>
          </table:table-cell>
          <table:table-cell table:style-name="Table3.A2" office:value-type="string">
            <text:p text:style-name="P14">Jeshebeab</text:p>
          </table:table-cell>
          <table:table-cell table:style-name="Table3.F2" office:value-type="string">
            <text:p text:style-name="P14"><text:span text:style-name="T77">S</text:span>eat of (his) father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4">Harim</text:p>
          </table:table-cell>
          <table:table-cell table:style-name="Table3.A2" office:value-type="string">
            <text:p text:style-name="P15">Snub nosed</text:p>
          </table:table-cell>
          <table:table-cell table:style-name="Table3.A2" office:value-type="string">
            <text:p text:style-name="P14">15</text:p>
          </table:table-cell>
          <table:table-cell table:style-name="Table3.A2" office:value-type="string">
            <text:p text:style-name="P14">Bilgah</text:p>
          </table:table-cell>
          <table:table-cell table:style-name="Table3.F2" office:value-type="string">
            <text:p text:style-name="P16">Desistance – <text:span text:style-name="T78">a ceasing to act or proceed; a stopping. </text:span>(comfort, recover, strength, strengthen)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4">Seorim</text:p>
          </table:table-cell>
          <table:table-cell table:style-name="Table3.A2" office:value-type="string">
            <text:p text:style-name="P17">Barley grains</text:p>
          </table:table-cell>
          <table:table-cell table:style-name="Table3.A2" office:value-type="string">
            <text:p text:style-name="P14">16</text:p>
          </table:table-cell>
          <table:table-cell table:style-name="Table3.A2" office:value-type="string">
            <text:p text:style-name="P14">Immer</text:p>
          </table:table-cell>
          <table:table-cell table:style-name="Table3.F2" office:value-type="string">
            <text:p text:style-name="P18">Talkative</text:p>
          </table:table-cell>
        </table:table-row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4">Malchijah</text:p>
          </table:table-cell>
          <table:table-cell table:style-name="Table3.A2" office:value-type="string">
            <text:p text:style-name="P14">king of (i.e. appointed by) Jah</text:p>
          </table:table-cell>
          <table:table-cell table:style-name="Table3.A2" office:value-type="string">
            <text:p text:style-name="P14">17</text:p>
          </table:table-cell>
          <table:table-cell table:style-name="Table3.A2" office:value-type="string">
            <text:p text:style-name="P14">Hezir</text:p>
          </table:table-cell>
          <table:table-cell table:style-name="Table3.F2" office:value-type="string">
            <text:p text:style-name="P18">Perhaps protected <text:span text:style-name="T79">(to enclose)</text:span></text:p>
          </table:table-cell>
        </table:table-row>
        <table:table-row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4">Mijamin</text:p>
          </table:table-cell>
          <table:table-cell table:style-name="Table3.A2" office:value-type="string">
            <text:p text:style-name="P19">From (the) right hand</text:p>
          </table:table-cell>
          <table:table-cell table:style-name="Table3.A2" office:value-type="string">
            <text:p text:style-name="P14">18</text:p>
          </table:table-cell>
          <table:table-cell table:style-name="Table3.A2" office:value-type="string">
            <text:p text:style-name="P14">Aphses</text:p>
          </table:table-cell>
          <table:table-cell table:style-name="Table3.F2" office:value-type="string">
            <text:p text:style-name="P20">Dissever (to separate, to divide asunder, to disunite), dispersive (scatter or dissipate)</text:p>
          </table:table-cell>
        </table:table-row>
        <table:table-row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4">Hakkoz</text:p>
          </table:table-cell>
          <table:table-cell table:style-name="Table3.A2" office:value-type="string">
            <text:p text:style-name="P21"><text:span text:style-name="T77">A</text:span> thorn (in the sense of pricking)</text:p>
          </table:table-cell>
          <table:table-cell table:style-name="Table3.A2" office:value-type="string">
            <text:p text:style-name="P14">19</text:p>
          </table:table-cell>
          <table:table-cell table:style-name="Table3.A2" office:value-type="string">
            <text:p text:style-name="P14">Pethahiah</text:p>
          </table:table-cell>
          <table:table-cell table:style-name="Table3.F2" office:value-type="string">
            <text:p text:style-name="P22">Jah has opened</text:p>
          </table:table-cell>
        </table:table-row>
        <table:table-row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Abijah</text:p>
          </table:table-cell>
          <table:table-cell table:style-name="Table3.A2" office:value-type="string">
            <text:p text:style-name="P14">father (i.e. worshipper) of Jah</text:p>
          </table:table-cell>
          <table:table-cell table:style-name="Table3.A2" office:value-type="string">
            <text:p text:style-name="P14">20</text:p>
          </table:table-cell>
          <table:table-cell table:style-name="Table3.A2" office:value-type="string">
            <text:p text:style-name="P14">Jehezekel</text:p>
          </table:table-cell>
          <table:table-cell table:style-name="Table3.F2" office:value-type="string">
            <text:p text:style-name="P22">God will strengthen</text:p>
          </table:table-cell>
        </table:table-row>
        <table:table-row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4">Jeshua</text:p>
          </table:table-cell>
          <table:table-cell table:style-name="Table3.A2" office:value-type="string">
            <text:p text:style-name="P23">He will save <text:span text:style-name="T80">(Jehovah-saved)</text:span></text:p>
          </table:table-cell>
          <table:table-cell table:style-name="Table3.A2" office:value-type="string">
            <text:p text:style-name="P14">21</text:p>
          </table:table-cell>
          <table:table-cell table:style-name="Table3.A2" office:value-type="string">
            <text:p text:style-name="P14">Jachin</text:p>
          </table:table-cell>
          <table:table-cell table:style-name="Table3.F2" office:value-type="string">
            <text:p text:style-name="P24">He (or it) will establish</text:p>
          </table:table-cell>
        </table:table-row>
        <table:table-row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4">Shecaniah</text:p>
          </table:table-cell>
          <table:table-cell table:style-name="Table3.A2" office:value-type="string">
            <text:p text:style-name="P25">Jah has dwelt</text:p>
          </table:table-cell>
          <table:table-cell table:style-name="Table3.A2" office:value-type="string">
            <text:p text:style-name="P14">22</text:p>
          </table:table-cell>
          <table:table-cell table:style-name="Table3.A2" office:value-type="string">
            <text:p text:style-name="P14">Gamul</text:p>
          </table:table-cell>
          <table:table-cell table:style-name="Table3.F2" office:value-type="string">
            <text:p text:style-name="P26">Rewarded</text:p>
          </table:table-cell>
        </table:table-row>
        <table:table-row>
          <table:table-cell table:style-name="Table3.A2" office:value-type="string">
            <text:p text:style-name="P13">11</text:p>
          </table:table-cell>
          <table:table-cell table:style-name="Table3.A2" office:value-type="string">
            <text:p text:style-name="P14">Eliashib</text:p>
          </table:table-cell>
          <table:table-cell table:style-name="Table3.A2" office:value-type="string">
            <text:p text:style-name="P27">God will restore</text:p>
          </table:table-cell>
          <table:table-cell table:style-name="Table3.A2" office:value-type="string">
            <text:p text:style-name="P14">23</text:p>
          </table:table-cell>
          <table:table-cell table:style-name="Table3.A2" office:value-type="string">
            <text:p text:style-name="P14">Delaiah</text:p>
          </table:table-cell>
          <table:table-cell table:style-name="Table3.F2" office:value-type="string">
            <text:p text:style-name="P28">Jah has delivered</text:p>
          </table:table-cell>
        </table:table-row>
        <table:table-row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4">Jakim</text:p>
          </table:table-cell>
          <table:table-cell table:style-name="Table3.A2" office:value-type="string">
            <text:p text:style-name="P27">He will raise</text:p>
          </table:table-cell>
          <table:table-cell table:style-name="Table3.A2" office:value-type="string">
            <text:p text:style-name="P14">24</text:p>
          </table:table-cell>
          <table:table-cell table:style-name="Table3.A2" office:value-type="string">
            <text:p text:style-name="P14">Maaziah</text:p>
          </table:table-cell>
          <table:table-cell table:style-name="Table3.F2" office:value-type="string">
            <text:p text:style-name="P29">Rescue of Jah (in the sense of protection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0T07:51:57.210000000</meta:creation-date>
    <meta:editing-duration>PT4H21M16S</meta:editing-duration>
    <meta:editing-cycles>111</meta:editing-cycles>
    <meta:generator>LibreOffice/26.2.4.2$Linux_X86_64 LibreOffice_project/64a984c51f4702dbd3710b13428c673a2f1292e7</meta:generator>
    <dc:title>BibleStudyTemplate</dc:title>
    <dc:date>2026-07-11T12:20:16.552541233</dc:date>
    <meta:document-statistic meta:table-count="4" meta:image-count="0" meta:object-count="0" meta:page-count="3" meta:paragraph-count="109" meta:word-count="1310" meta:character-count="7147" meta:non-whitespace-character-count="5928"/>
    <meta:template xlink:type="simple" xlink:actuate="onRequest" xlink:title="BibleStudyTemplate" xlink:href="../../../../AppData/Roaming/LibreOffice/4/user/template/BibleStudyTemplate.ott" meta:date="2025-05-10T07:51:56.324000000"/>
  </office:meta>
</office:document-meta>
</file>