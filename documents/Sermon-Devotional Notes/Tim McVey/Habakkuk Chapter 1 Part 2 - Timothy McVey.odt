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99c67" officeooo:paragraph-rsid="00099c67"/>
    </style:style>
    <style:style style:name="P2" style:family="paragraph" style:parent-style-name="Text_20_body">
      <style:paragraph-properties fo:text-align="center" style:justify-single-word="false"/>
      <style:text-properties officeooo:paragraph-rsid="00099c67"/>
    </style:style>
    <style:style style:name="P3" style:family="paragraph" style:parent-style-name="Table_20_Contents">
      <style:text-properties fo:color="#127622" loext:opacity="100%"/>
    </style:style>
    <style:style style:name="P4" style:family="paragraph" style:parent-style-name="Text_20_body" style:list-style-name="L1">
      <style:text-properties officeooo:rsid="0042a3ce" officeooo:paragraph-rsid="0042a3ce"/>
    </style:style>
    <style:style style:name="P5" style:family="paragraph" style:parent-style-name="Text_20_body">
      <style:text-properties officeooo:rsid="0042a3ce" officeooo:paragraph-rsid="0042a3ce"/>
    </style:style>
    <style:style style:name="P6" style:family="paragraph" style:parent-style-name="Text_20_body" style:list-style-name="L2">
      <style:text-properties officeooo:rsid="0042a3ce" officeooo:paragraph-rsid="00446771"/>
    </style:style>
    <style:style style:name="P7" style:family="paragraph" style:parent-style-name="Text_20_body">
      <style:text-properties officeooo:rsid="0042a3ce" officeooo:paragraph-rsid="00446771"/>
    </style:style>
    <style:style style:name="P8" style:family="paragraph" style:parent-style-name="Table_20_Contents">
      <style:text-properties officeooo:rsid="00476b3b" officeooo:paragraph-rsid="00476b3b"/>
    </style:style>
    <style:style style:name="P9" style:family="paragraph" style:parent-style-name="Text_20_body">
      <style:text-properties officeooo:paragraph-rsid="0042a3ce"/>
    </style:style>
    <style:style style:name="P10" style:family="paragraph" style:parent-style-name="Table_20_Contents">
      <style:text-properties officeooo:rsid="004f632c" officeooo:paragraph-rsid="004f632c"/>
    </style:style>
    <style:style style:name="P11" style:family="paragraph" style:parent-style-name="Table_20_Contents">
      <style:text-properties fo:color="#127622" loext:opacity="100%" officeooo:rsid="004f632c" officeooo:paragraph-rsid="004f632c"/>
    </style:style>
    <style:style style:name="T1" style:family="text">
      <style:text-properties officeooo:rsid="00336675"/>
    </style:style>
    <style:style style:name="T2" style:family="text">
      <style:text-properties officeooo:rsid="003a390d"/>
    </style:style>
    <style:style style:name="T3" style:family="text">
      <style:text-properties officeooo:rsid="00099c67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446771"/>
    </style:style>
    <style:style style:name="T6" style:family="text">
      <style:text-properties fo:color="#127622" loext:opacity="100%" officeooo:rsid="004467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m McVey - </text:span>Habakkuk Chapter 1 Part <text:span text:style-name="T2">2</text:span> – 2025-11-1<text:span text:style-name="T2">8</text:span></text:p>
      <text:p text:style-name="P1"/>
      <text:p text:style-name="P2"><text:a xlink:type="simple" xlink:href="https://www.buzzsprout.com/1909318/episodes/18206139-habakkuk-chapter-1-part-2.mp3" text:style-name="Internet_20_link" text:visited-style-name="Visited_20_Internet_20_Link"><text:span text:style-name="T3">https://www.buzzsprout.com/1909318/episodes/18206139-habakkuk-chapter-1-part-2.mp3</text:span></text:a>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1 Peter 1:11</text:p>
            <text:p text:style-name="Table_20_Contents">Searching what, or what manner of time the <text:span text:style-name="T4">Spirit of Christ</text:span> which was in them did signify, when <text:span text:style-name="T4">it</text:span> testified beforehand the sufferings of Christ, and the glory that should follow.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Acts 2:23</text:p>
            <text:p text:style-name="Table_20_Contents">Him, being delivered by the determinate counsel and <text:span text:style-name="T4">foreknowledge of God</text:span>, ye have taken, and by wicked hands have crucified and slain:</text:p>
            <text:p text:style-name="Table_20_Contents"/>
            <text:p text:style-name="P3">1 Peter 1:2</text:p>
            <text:p text:style-name="Table_20_Contents">Elect according to the <text:span text:style-name="T4">foreknowledge of God</text:span> the Father, through sanctification of the Spirit, unto obedience and sprinkling of the blood of Jesus Christ: Grace unto you, and peace, be multiplied.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Isaiah 53:4</text:p>
            <text:p text:style-name="Table_20_Contents">Surely <text:span text:style-name="T4">he</text:span> hath borne our griefs, and carried our sorrows: yet we did esteem <text:span text:style-name="T4">him</text:span> stricken, smitten of God, and afflicted.</text:p>
          </table:table-cell>
        </table:table-row>
      </table:table>
      <text:list text:style-name="L1">
        <text:list-item>
          <text:p text:style-name="P4">Spirit of Christ <text:span text:style-name="T5">= Spirit of God = Holy Ghost = Holy Spirit (</text:span><text:span text:style-name="T6">Romans 8:9</text:span><text:span text:style-name="T5">)</text:span></text:p>
        </text:list-item>
      </text:list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Isaiah 50:5-6</text:p>
            <text:p text:style-name="Table_20_Contents">5 The Lord GOD hath opened <text:span text:style-name="T4">mine</text:span> ear, and <text:span text:style-name="T4">I</text:span> was not rebellious, neither turned away back.</text:p>
            <text:p text:style-name="Table_20_Contents">6 <text:span text:style-name="T4">I</text:span> gave <text:span text:style-name="T4">my</text:span> back to the smiters, and <text:span text:style-name="T4">my</text:span> cheeks to them that plucked off the hair: <text:span text:style-name="T4">I</text:span> hid not <text:span text:style-name="T4">my</text:span> face from shame and spitting.</text:p>
          </table:table-cell>
        </table:table-row>
      </table:table>
      <text:list text:style-name="L2">
        <text:list-item>
          <text:p text:style-name="P6">Spirit of Christ <text:span text:style-name="T5">= Spirit of God = Holy Ghost = Holy Spirit (</text:span><text:span text:style-name="T6">Romans 8:9</text:span><text:span text:style-name="T5">)</text:span></text:p>
        </text:list-item>
      </text:list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To the chief Musician upon Nehiloth, A Psalm of David.</text:p>
            <text:p text:style-name="P8"/>
            <text:p text:style-name="P3">Psalms 5:1-3</text:p>
            <text:p text:style-name="Table_20_Contents">1 Give ear to my words, O LORD, consider my meditation.</text:p>
            <text:p text:style-name="Table_20_Contents">2 Hearken unto the voice of <text:span text:style-name="T4">my cry</text:span>, my King, and my God: for unto thee will I pray.</text:p>
            <text:p text:style-name="Table_20_Contents">3 <text:span text:style-name="T4">My voice shalt thou hear in the morning</text:span>, O LORD; in the morning will I direct my prayer unto thee, and will look up.</text:p>
            <text:p text:style-name="Table_20_Contents"/>
            <text:p text:style-name="P3">Psalms 30:5</text:p>
            <text:p text:style-name="Table_20_Contents">For his anger endureth but a moment; in his favour is life: <text:span text:style-name="T4">weeping may endure for a night, but joy cometh in the morning.</text:span></text:p>
          </table:table-cell>
        </table:table-row>
      </table:table>
      <text:p text:style-name="P9"/>
      <table:table table:name="Table6" table:style-name="Table6">
        <table:table-column table:style-name="Table6.A"/>
        <table:table-row>
          <table:table-cell table:style-name="Table6.A1" office:value-type="string">
            <text:p text:style-name="P3">Psalms 9:12-13</text:p>
            <text:p text:style-name="Table_20_Contents">12 When he maketh inquisition for blood, he remembereth them: he forgetteth not <text:span text:style-name="T4">the cry</text:span> of <text:span text:style-name="T4">the humble</text:span>.</text:p>
            <text:p text:style-name="Table_20_Contents">13 Have mercy upon me, O LORD; consider my trouble which I suffer of them that hate me, thou that liftest me up from the gates of death:</text:p>
          </table:table-cell>
        </table:table-row>
      </table:table>
      <text:p text:style-name="P9"/>
      <table:table table:name="Table7" table:style-name="Table7">
        <table:table-column table:style-name="Table7.A"/>
        <table:table-row>
          <table:table-cell table:style-name="Table7.A1" office:value-type="string">
            <text:p text:style-name="P3">Psalms 18:6</text:p>
            <text:p text:style-name="Table_20_Contents">In my distress I called upon the LORD, and cried unto my God: he heard my voice out of his temple, and my cry came before him, even into his ears.</text:p>
          </table:table-cell>
        </table:table-row>
      </table:table>
      <text:p text:style-name="P9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0">To the chief Musician upon Aijeleth Shahar, A Psalm of David.</text:p>
            <text:p text:style-name="P10"/>
            <text:p text:style-name="P11">Psalm 22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keep-together="always" fo:orphans="0" fo:widows="0" style:page-number="auto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09:33:10.554672941</meta:creation-date>
    <dc:title>default</dc:title>
    <meta:editing-duration>PT6H2M19S</meta:editing-duration>
    <meta:editing-cycles>71</meta:editing-cycles>
    <meta:generator>LibreOffice/26.2.4.2$Linux_X86_64 LibreOffice_project/64a984c51f4702dbd3710b13428c673a2f1292e7</meta:generator>
    <dc:date>2026-07-11T12:31:33.298153905</dc:date>
    <meta:document-statistic meta:table-count="8" meta:image-count="0" meta:object-count="0" meta:page-count="2" meta:paragraph-count="29" meta:word-count="390" meta:character-count="2107" meta:non-whitespace-character-count="1747"/>
    <meta:template xlink:type="simple" xlink:actuate="onRequest" xlink:title="default" xlink:href="../../../../../../Templates/default.ott" meta:date="2025-12-26T11:12:07.953102190"/>
  </office:meta>
</office:document-meta>
</file>