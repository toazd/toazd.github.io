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99c67" officeooo:paragraph-rsid="00099c67"/>
    </style:style>
    <style:style style:name="P2" style:family="paragraph" style:parent-style-name="Text_20_body">
      <style:paragraph-properties fo:text-align="center" style:justify-single-word="false"/>
      <style:text-properties officeooo:paragraph-rsid="00099c67"/>
    </style:style>
    <style:style style:name="T1" style:family="text">
      <style:text-properties officeooo:rsid="00336675"/>
    </style:style>
    <style:style style:name="T2" style:family="text">
      <style:text-properties officeooo:rsid="008701c8"/>
    </style:style>
    <style:style style:name="T3" style:family="text">
      <style:text-properties officeooo:rsid="006baaca"/>
    </style:style>
    <style:style style:name="T4" style:family="text">
      <style:text-properties officeooo:rsid="0084710a"/>
    </style:style>
    <style:style style:name="T5" style:family="text">
      <style:text-properties fo:color="#127622" loext:opacity="100%"/>
    </style:style>
    <style:style style:name="T6" style:family="text">
      <style:text-properties fo:background-color="#ffff00" loext:char-shading-value="0"/>
    </style:style>
    <style:style style:name="T7" style:family="text">
      <style:text-properties fo:color="#127622" loext:opacity="100%" style:text-position="super 58%" officeooo:rsid="008fa309"/>
    </style:style>
    <style:style style:name="T8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m McVey - </text:span>Habakkuk Chapter 1 Part <text:span text:style-name="T2">5</text:span> – 2025-11-<text:span text:style-name="T3">2</text:span><text:span text:style-name="T4">1</text:span></text:p>
      <text:p text:style-name="P1"/>
      <text:p text:style-name="P2"><text:a xlink:type="simple" xlink:href="https://www.buzzsprout.com/1909318/episodes/18206152-habakkuk-chapter-1-part-5.mp3" text:style-name="Internet_20_link" text:visited-style-name="Visited_20_Internet_20_Link">https://www.buzzsprout.com/1909318/episodes/18206152-habakkuk-chapter-1-part-5.mp3</text:a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5">Psalms 7:3-5</text:span><text:line-break/>3 O LORD my God, if I have done this; if there be iniquity in my hands;<text:line-break/>4 If I have rewarded evil unto him that was at peace with me; (yea, I have delivered him that without cause is mine enemy:)<text:line-break/>5 Let the enemy persecute my soul, and take it; yea, let him tread down my life upon the earth, and lay mine honour in the dust. Selah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5">Psalms 18:23-24</text:span><text:line-break/>23 I was also upright before him, and I kept myself from mine iniquity.<text:line-break/>24 Therefore hath the LORD recompensed me according to my righteousness, according to the cleanness of my hands in his eyesight.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5">Psalms 31:9-12</text:span><text:line-break/>9 Have mercy upon me, O LORD, for I am in trouble: mine eye is consumed with grief, yea, my soul and my belly.<text:line-break/>10 For my life is spent with grief, and my years with sighing: my strength faileth because of mine iniquity, and my bones are consumed.<text:line-break/>11 I was a reproach among all mine enemies, but especially among my neighbours, and a fear to mine acquaintance: they that did see me without fled from me.<text:line-break/>12 I am forgotten as a dead man out of mind: I am like a broken vessel.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5">Isaiah 53:4</text:span><text:line-break/>Surely <text:span text:style-name="T6">he hath borne our griefs</text:span>, and carried our sorrows: yet we did esteem him stricken, smitten of God, and afflicted.</text:p>
            <text:p text:style-name="Table_20_Contents"/>
            <text:p text:style-name="Table_20_Contents"><text:span text:style-name="T5">Isaiah 53:6</text:span><text:line-break/>All we like sheep have gone astray; we have turned every one to his own way; and <text:span text:style-name="T6">the LORD hath laid on him the iniquity of us all.</text:span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5">Psalms 38:1-8</text:span><text:line-break/>1 O LORD, rebuke me not in thy wrath: neither chasten me in thy hot displeasure.<text:line-break/>2 For thine arrows stick fast in me, and thy hand presseth me sore.<text:line-break/>3 There is no soundness in my flesh because of thine anger; neither is there any rest in my bones because of my sin.<text:line-break/>4 For mine iniquities are gone over mine head: as an heavy burden they are too heavy for me.<text:line-break/>5 My wounds stink and are corrupt because of my foolishness.<text:line-break/>6 <text:span text:style-name="T6">I am</text:span> troubled; <text:span text:style-name="T6">I am</text:span> bowed down greatly; I go mourning all the day long.<text:line-break/>7 For my loins are filled with a loathsome disease: and there is no soundness in my flesh.<text:line-break/>8 <text:span text:style-name="T6">I am</text:span> feeble and sore broken: I have roared by reason of the disquietness of my heart.</text:p>
            <text:p text:style-name="Table_20_Contents"/>
            <text:p text:style-name="Table_20_Contents"><text:span text:style-name="T5">Psalms 38:17</text:span><text:line-break/>For <text:span text:style-name="T6">I am</text:span> ready to halt, and my sorrow is continually before me.</text:p>
            <text:p text:style-name="Table_20_Contents"/>
            <text:p text:style-name="Table_20_Contents"><text:span text:style-name="T5">Psalms 18:4-5</text:span><text:line-break/>4 The sorrows of death compassed me, and the floods of ungodly men made me afraid.<text:line-break/>5 The sorrows of hell compassed me about: the snares of death prevented me.</text:p>
          </table:table-cell>
        </table:table-row>
      </table:table>
      <text:p text:style-name="Text_20_body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text:span text:style-name="T5">Matthew 8:16-17</text:span><text:line-break/>16 When the even was come, they brought unto him many that were possessed with devils: and he cast out the spirits with his word, and healed all that were sick:<text:line-break/>17 That it might be fulfilled which was spoken by Esaias the prophet<text:span text:style-name="T7">Isaiah 53:4</text:span>, saying, Himself took our infirmities, and bare our sicknesses.</text:p>
            <text:p text:style-name="Table_20_Contents"/>
            <text:p text:style-name="Table_20_Contents"><text:span text:style-name="T5">John 15:13</text:span><text:line-break/><text:span text:style-name="T8">Greater love hath no man than this, that a man lay down his life for his friends.</text:span></text:p>
            <text:p text:style-name="Table_20_Contents"/>
            <text:p text:style-name="Table_20_Contents"><text:span text:style-name="T5">Song of Solomon 2:4</text:span><text:line-break/>He brought me to the banqueting house, and his banner over me was love.</text:p>
            <text:p text:style-name="Table_20_Contents"/>
            <text:p text:style-name="Table_20_Contents"><text:span text:style-name="T5">Jeremiah 31:3</text:span><text:line-break/>The LORD hath appeared of old unto me, saying, Yea, <text:span text:style-name="T6">I have loved thee with an everlasting love</text:span>: therefore with lovingkindness have I drawn thee.</text:p>
            <text:p text:style-name="Table_20_Contents"/>
            <text:p text:style-name="Table_20_Contents"><text:span text:style-name="T5">Hebrews 2:9</text:span><text:line-break/>But we see Jesus, who was made a little lower than the angels for the suffering of death, crowned with glory and honour; that he by the grace of God should taste death for every man.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5">Psalms 49:5</text:span><text:line-break/>Wherefore should I fear in the days of evil, when the iniquity of my heels shall compass me about?</text:p>
            <text:p text:style-name="Table_20_Contents"/>
            <text:p text:style-name="Table_20_Contents"><text:span text:style-name="T5">Genesis 3:15</text:span><text:line-break/>And I will put enmity between thee and the woman, and between thy seed and her seed; it shall bruise thy head, and thou shalt bruise his heel.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span text:style-name="T5">Psalms 55:3-5</text:span><text:line-break/>3 Because of the voice of the enemy, because of the oppression of the wicked: for they cast iniquity upon me, and in wrath they hate me.<text:line-break/>4 My heart is sore pained within me: and the terrors of death are fallen upon me.<text:line-break/>5 Fearfulness and trembling are come upon me, and horror hath overwhelmed me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09:33:10.554672941</meta:creation-date>
    <dc:title>default</dc:title>
    <meta:editing-duration>PT10H30M54S</meta:editing-duration>
    <meta:editing-cycles>138</meta:editing-cycles>
    <meta:generator>LibreOffice/26.2.4.2$Linux_X86_64 LibreOffice_project/64a984c51f4702dbd3710b13428c673a2f1292e7</meta:generator>
    <dc:date>2026-07-11T12:20:36.746563423</dc:date>
    <meta:document-statistic meta:table-count="8" meta:image-count="0" meta:object-count="0" meta:page-count="2" meta:paragraph-count="18" meta:word-count="722" meta:character-count="3819" meta:non-whitespace-character-count="3114"/>
    <meta:template xlink:type="simple" xlink:actuate="onRequest" xlink:title="default" xlink:href="../../../../../../Templates/default.ott" meta:date="2025-12-26T16:53:52.743179276"/>
  </office:meta>
</office:document-meta>
</file>