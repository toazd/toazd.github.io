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99c67" officeooo:paragraph-rsid="00099c67"/>
    </style:style>
    <style:style style:name="P2" style:family="paragraph" style:parent-style-name="Text_20_body">
      <style:paragraph-properties fo:text-align="center" style:justify-single-word="false"/>
      <style:text-properties officeooo:paragraph-rsid="00099c67"/>
    </style:style>
    <style:style style:name="T1" style:family="text">
      <style:text-properties officeooo:rsid="00336675"/>
    </style:style>
    <style:style style:name="T2" style:family="text">
      <style:text-properties officeooo:rsid="00a6369d"/>
    </style:style>
    <style:style style:name="T3" style:family="text">
      <style:text-properties fo:color="#127622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m McVey - </text:span>Habakkuk Chapter 1 Part <text:span text:style-name="T2">7</text:span> – 2025-11-<text:span text:style-name="T2">25</text:span></text:p>
      <text:p text:style-name="P1"/>
      <text:p text:style-name="P2"><text:a xlink:type="simple" xlink:href="https://www.buzzsprout.com/1909318/episodes/18220904-habakkuk-chapter-1-part-7.mp3" text:style-name="Internet_20_link" text:visited-style-name="Visited_20_Internet_20_Link">https://www.buzzsprout.com/1909318/episodes/18220904-habakkuk-chapter-1-part-7.mp3</text:a>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3">Habakkuk 1:5</text:span><text:line-break/>Behold ye among the heathen, and regard, and wonder marvellously: for I will work a work in your days, which ye will not believe, though it be told you.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3">Esther 1:1-3</text:span><text:line-break/>1 Now it came to pass in the days of Ahasuerus, (this is Ahasuerus which reigned, from India even unto Ethiopia, over an hundred and seven and twenty provinces:)<text:line-break/>2 That in those days, when the king Ahasuerus sat on the throne of his kingdom, which was in Shushan the palace,<text:line-break/>3 In the third year of his reign, he made a feast unto all his princes and his servants; the power of Persia and Media, the nobles and princes of the provinces, being before him: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keep-together="always" fo:orphans="0" fo:widows="0" style:page-number="auto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6T09:33:10.554672941</meta:creation-date>
    <dc:title>default</dc:title>
    <meta:editing-duration>PT18H1M56S</meta:editing-duration>
    <meta:editing-cycles>155</meta:editing-cycles>
    <meta:generator>LibreOffice/26.2.4.2$Linux_X86_64 LibreOffice_project/64a984c51f4702dbd3710b13428c673a2f1292e7</meta:generator>
    <dc:date>2026-07-11T12:31:35.375282961</dc:date>
    <meta:document-statistic meta:table-count="2" meta:image-count="0" meta:object-count="0" meta:page-count="1" meta:paragraph-count="4" meta:word-count="129" meta:character-count="763" meta:non-whitespace-character-count="637"/>
    <meta:template xlink:type="simple" xlink:actuate="onRequest" xlink:title="default" xlink:href="../../../../../../Templates/default.ott" meta:date="2025-12-26T16:53:52.743179276"/>
  </office:meta>
</office:document-meta>
</file>