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4" style:family="table">
      <style:table-properties style:width="7.9in" table:align="margins"/>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Table5" style:family="table">
      <style:table-properties style:width="7.9in" table:align="margins"/>
    </style:style>
    <style:style style:name="Table5.A" style:family="table-column">
      <style:table-column-properties style:column-width="7.9in" style:rel-column-width="65535*"/>
    </style:style>
    <style:style style:name="Table5.1" style:family="table-row">
      <style:table-row-properties fo:keep-together="always"/>
    </style:style>
    <style:style style:name="Table5.A1" style:family="table-cell">
      <style:table-cell-properties fo:padding="0.0382in" fo:border="0.5pt solid #000000"/>
    </style:style>
    <style:style style:name="Table6" style:family="table">
      <style:table-properties style:width="7.9in" table:align="margins"/>
    </style:style>
    <style:style style:name="Table6.A" style:family="table-column">
      <style:table-column-properties style:column-width="7.9in" style:rel-column-width="65535*"/>
    </style:style>
    <style:style style:name="Table6.A1" style:family="table-cell">
      <style:table-cell-properties fo:padding="0.0382in" fo:border="0.5pt solid #000000"/>
    </style:style>
    <style:style style:name="Table7" style:family="table">
      <style:table-properties style:width="7.9in" table:align="margins"/>
    </style:style>
    <style:style style:name="Table7.A" style:family="table-column">
      <style:table-column-properties style:column-width="7.9in" style:rel-column-width="65535*"/>
    </style:style>
    <style:style style:name="Table7.A1" style:family="table-cell">
      <style:table-cell-properties fo:padding="0.0382in" fo:border="0.5pt solid #000000"/>
    </style:style>
    <style:style style:name="Table8" style:family="table">
      <style:table-properties style:width="7.9in" table:align="margins"/>
    </style:style>
    <style:style style:name="Table8.A" style:family="table-column">
      <style:table-column-properties style:column-width="7.9in" style:rel-column-width="65535*"/>
    </style:style>
    <style:style style:name="Table8.A1" style:family="table-cell">
      <style:table-cell-properties fo:padding="0.0382in" fo:border="0.5pt solid #000000"/>
    </style:style>
    <style:style style:name="Table9" style:family="table">
      <style:table-properties style:width="7.9in" table:align="margins"/>
    </style:style>
    <style:style style:name="Table9.A" style:family="table-column">
      <style:table-column-properties style:column-width="7.9in" style:rel-column-width="65535*"/>
    </style:style>
    <style:style style:name="Table9.A1" style:family="table-cell">
      <style:table-cell-properties fo:padding="0.0382in" fo:border="0.5pt solid #000000"/>
    </style:style>
    <style:style style:name="Table10" style:family="table">
      <style:table-properties style:width="7.9in" table:align="margins"/>
    </style:style>
    <style:style style:name="Table10.A" style:family="table-column">
      <style:table-column-properties style:column-width="7.9in" style:rel-column-width="65535*"/>
    </style:style>
    <style:style style:name="Table10.A1" style:family="table-cell">
      <style:table-cell-properties fo:padding="0.0382in" fo:border="0.5pt solid #000000"/>
    </style:style>
    <style:style style:name="Table11" style:family="table">
      <style:table-properties style:width="7.9in" table:align="margins"/>
    </style:style>
    <style:style style:name="Table11.A" style:family="table-column">
      <style:table-column-properties style:column-width="7.9in" style:rel-column-width="65535*"/>
    </style:style>
    <style:style style:name="Table11.A1" style:family="table-cell">
      <style:table-cell-properties fo:padding="0.0382in" fo:border="0.5pt solid #000000"/>
    </style:style>
    <style:style style:name="Table12" style:family="table">
      <style:table-properties style:width="7.9in" table:align="margins"/>
    </style:style>
    <style:style style:name="Table12.A" style:family="table-column">
      <style:table-column-properties style:column-width="7.9in" style:rel-column-width="65535*"/>
    </style:style>
    <style:style style:name="Table12.1" style:family="table-row">
      <style:table-row-properties fo:keep-together="always"/>
    </style:style>
    <style:style style:name="Table12.A1" style:family="table-cell">
      <style:table-cell-properties fo:padding="0.0382in" fo:border="0.5pt solid #000000"/>
    </style:style>
    <style:style style:name="Table13" style:family="table">
      <style:table-properties style:width="7.9in" table:align="margins"/>
    </style:style>
    <style:style style:name="Table13.A" style:family="table-column">
      <style:table-column-properties style:column-width="7.9in" style:rel-column-width="65535*"/>
    </style:style>
    <style:style style:name="Table13.1" style:family="table-row">
      <style:table-row-properties fo:keep-together="always"/>
    </style:style>
    <style:style style:name="Table13.A1" style:family="table-cell">
      <style:table-cell-properties fo:padding="0.0382in" fo:border="0.5pt solid #000000"/>
    </style:style>
    <style:style style:name="Table14" style:family="table">
      <style:table-properties style:width="7.9in" table:align="margins"/>
    </style:style>
    <style:style style:name="Table14.A" style:family="table-column">
      <style:table-column-properties style:column-width="7.9in" style:rel-column-width="65535*"/>
    </style:style>
    <style:style style:name="Table14.A1" style:family="table-cell">
      <style:table-cell-properties fo:padding="0.0382in" fo:border="0.5pt solid #000000"/>
    </style:style>
    <style:style style:name="Table15" style:family="table">
      <style:table-properties style:width="7.9in" table:align="margins"/>
    </style:style>
    <style:style style:name="Table15.A" style:family="table-column">
      <style:table-column-properties style:column-width="7.9in" style:rel-column-width="65535*"/>
    </style:style>
    <style:style style:name="Table15.1" style:family="table-row">
      <style:table-row-properties fo:keep-together="always"/>
    </style:style>
    <style:style style:name="Table15.A1" style:family="table-cell">
      <style:table-cell-properties fo:padding="0.0382in" fo:border="0.5pt solid #000000"/>
    </style:style>
    <style:style style:name="Table16" style:family="table">
      <style:table-properties style:width="7.9in" table:align="margins"/>
    </style:style>
    <style:style style:name="Table16.A" style:family="table-column">
      <style:table-column-properties style:column-width="7.9in" style:rel-column-width="65535*"/>
    </style:style>
    <style:style style:name="Table16.A1" style:family="table-cell">
      <style:table-cell-properties fo:padding="0.0382in" fo:border="0.5pt solid #000000"/>
    </style:style>
    <style:style style:name="Table17" style:family="table">
      <style:table-properties style:width="7.9in" table:align="margins"/>
    </style:style>
    <style:style style:name="Table17.A" style:family="table-column">
      <style:table-column-properties style:column-width="7.9in" style:rel-column-width="65535*"/>
    </style:style>
    <style:style style:name="Table17.A1" style:family="table-cell">
      <style:table-cell-properties fo:padding="0.0382in" fo:border="0.5pt solid #000000"/>
    </style:style>
    <style:style style:name="P1" style:family="paragraph" style:parent-style-name="Standard">
      <style:paragraph-properties fo:text-align="center" style:justify-single-word="false"/>
      <style:text-properties officeooo:rsid="00099c67" officeooo:paragraph-rsid="00099c67"/>
    </style:style>
    <style:style style:name="P2" style:family="paragraph" style:parent-style-name="Text_20_body">
      <style:paragraph-properties fo:text-align="center" style:justify-single-word="false"/>
      <style:text-properties officeooo:rsid="00099c67" officeooo:paragraph-rsid="00099c67"/>
    </style:style>
    <style:style style:name="P3" style:family="paragraph" style:parent-style-name="Text_20_body">
      <style:text-properties officeooo:rsid="00099c67" officeooo:paragraph-rsid="00099c67"/>
    </style:style>
    <style:style style:name="P4" style:family="paragraph" style:parent-style-name="Table_20_Contents">
      <style:text-properties fo:color="#127622" loext:opacity="100%"/>
    </style:style>
    <style:style style:name="P5" style:family="paragraph" style:parent-style-name="Text_20_body" style:list-style-name="L1">
      <style:text-properties officeooo:paragraph-rsid="002c860c"/>
    </style:style>
    <style:style style:name="P6" style:family="paragraph" style:parent-style-name="Text_20_body">
      <style:text-properties officeooo:paragraph-rsid="002c860c"/>
    </style:style>
    <style:style style:name="P7" style:family="paragraph" style:parent-style-name="Text_20_body">
      <style:paragraph-properties fo:margin-top="0in" fo:margin-bottom="0in" style:contextual-spacing="false"/>
    </style:style>
    <style:style style:name="P8" style:family="paragraph" style:parent-style-name="Text_20_body">
      <style:paragraph-properties fo:margin-top="0in" fo:margin-bottom="0in" style:contextual-spacing="false"/>
      <style:text-properties officeooo:rsid="00099c67" officeooo:paragraph-rsid="00099c67"/>
    </style:style>
    <style:style style:name="T1" style:family="text">
      <style:text-properties officeooo:rsid="00336675"/>
    </style:style>
    <style:style style:name="T2" style:family="text">
      <style:text-properties fo:background-color="#ffff00" loext:char-shading-value="0"/>
    </style:style>
    <style:style style:name="T3" style:family="text">
      <style:text-properties fo:background-color="#dee6ef" loext:char-shading-value="0"/>
    </style:style>
    <style:style style:name="T4" style:family="text">
      <style:text-properties fo:background-color="#fff5ce" loext:char-shading-value="0"/>
    </style:style>
    <style:style style:name="T5" style:family="text">
      <style:text-properties officeooo:rsid="00177a5f"/>
    </style:style>
    <style:style style:name="T6" style:family="text">
      <style:text-properties fo:font-style="italic" officeooo:rsid="00177a5f" style:font-style-asian="italic" style:font-style-complex="italic"/>
    </style:style>
    <style:style style:name="T7" style:family="text">
      <style:text-properties officeooo:rsid="001a2a28"/>
    </style:style>
    <style:style style:name="T8" style:family="text">
      <style:text-properties fo:color="#127622" loext:opacity="100%" officeooo:rsid="001a2a28"/>
    </style:style>
    <style:style style:name="T9" style:family="text">
      <style:text-properties fo:color="#127622" loext:opacity="100%" officeooo:rsid="0018811e"/>
    </style:style>
    <style:style style:name="T10" style:family="text">
      <style:text-properties officeooo:rsid="002c860c"/>
    </style:style>
    <style:style style:name="T11" style:family="text">
      <style:text-properties fo:color="#127622" loext:opacity="100%" officeooo:rsid="0024832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im McVey - </text:span>Habakkuk Chapter 1 Part 1 – 2025-11-17</text:p>
      <text:p text:style-name="P1"/>
      <text:p text:style-name="P2"><text:a xlink:type="simple" xlink:href="https://www.buzzsprout.com/1909318/episodes/18152205-habakkuk-chapter-1-part-1.mp3" text:style-name="Internet_20_link" text:visited-style-name="Visited_20_Internet_20_Link">https://www.buzzsprout.com/1909318/episodes/18152205-habakkuk-chapter-1-part-1.mp3</text:a></text:p>
      <text:p text:style-name="P3"/>
      <table:table table:name="Table1" table:style-name="Table1">
        <table:table-column table:style-name="Table1.A"/>
        <table:table-row>
          <table:table-cell table:style-name="Table1.A1" office:value-type="string">
            <text:p text:style-name="P4">Habakkuk 1:1-4</text:p>
            <text:p text:style-name="Table_20_Contents">1 The burden which Habakkuk the prophet did <text:span text:style-name="T2">see</text:span>.</text:p>
            <text:p text:style-name="Table_20_Contents">2 <text:span text:style-name="T3">O LORD, how long shall I cry</text:span>, and thou wilt not hear! even cry out unto thee of violence, and thou wilt not save!</text:p>
            <text:p text:style-name="Table_20_Contents">3 Why dost thou shew me iniquity, and cause me to behold grievance? for spoiling and violence are before me: and there are that raise up strife and contention.</text:p>
            <text:p text:style-name="Table_20_Contents">4 <text:span text:style-name="T4">Therefore the law is slacked, and judgment doth never go forth: for </text:span><text:span text:style-name="T3">the wicked</text:span><text:span text:style-name="T4"> doth compass about </text:span><text:span text:style-name="T3">the righteous</text:span>; therefore wrong judgment proceedeth.</text:p>
          </table:table-cell>
        </table:table-row>
      </table:table>
      <text:list text:style-name="L1">
        <text:list-item>
          <text:p text:style-name="P5"><text:span text:style-name="T5">V2 – the cry of </text:span><text:span text:style-name="T6">the</text:span><text:span text:style-name="T5"> righteous </text:span><text:span text:style-name="T7">(</text:span><text:span text:style-name="T8">P</text:span><text:span text:style-name="T9">salm 22:1</text:span><text:span text:style-name="T7">) </text:span><text:span text:style-name="T10">(</text:span><text:span text:style-name="T11">1 John 2:1</text:span>)</text:p>
        </text:list-item>
      </text:list>
      <text:p text:style-name="P6"/>
      <table:table table:name="Table2" table:style-name="Table2">
        <table:table-column table:style-name="Table2.A"/>
        <table:table-row>
          <table:table-cell table:style-name="Table2.A1" office:value-type="string">
            <text:p text:style-name="P4">Isaiah 59:1-4</text:p>
            <text:p text:style-name="Table_20_Contents">1 Behold, the LORD'S hand is not shortened, that it cannot save; neither his ear heavy, that it cannot hear:</text:p>
            <text:p text:style-name="Table_20_Contents">2 But your iniquities have separated between you and your God, and your sins have hid his face from you, that he will not hear.</text:p>
            <text:p text:style-name="Table_20_Contents">3 For your hands are defiled with blood, and your fingers with iniquity; your lips have spoken lies, your tongue hath muttered perverseness.</text:p>
            <text:p text:style-name="Table_20_Contents">4 <text:span text:style-name="T4">None calleth for justice</text:span>, nor any pleadeth for truth: they trust in vanity, and speak lies; they conceive mischief, and bring forth iniquity.</text:p>
          </table:table-cell>
        </table:table-row>
      </table:table>
      <text:p text:style-name="P7"/>
      <table:table table:name="Table3" table:style-name="Table3">
        <table:table-column table:style-name="Table3.A"/>
        <table:table-row>
          <table:table-cell table:style-name="Table3.A1" office:value-type="string">
            <text:p text:style-name="P4">Nahum 1:1</text:p>
            <text:p text:style-name="Table_20_Contents">The burden of Nineveh. The book of the <text:span text:style-name="T2">vision</text:span> of Nahum the Elkoshite.</text:p>
          </table:table-cell>
        </table:table-row>
      </table:table>
      <text:p text:style-name="P7"/>
      <table:table table:name="Table4" table:style-name="Table4">
        <table:table-column table:style-name="Table4.A"/>
        <table:table-row>
          <table:table-cell table:style-name="Table4.A1" office:value-type="string">
            <text:p text:style-name="P4">Psalms 6:1-2</text:p>
            <text:p text:style-name="Table_20_Contents">1 O LORD, rebuke me not in thine anger, neither chasten me in thy hot displeasure.</text:p>
            <text:p text:style-name="Table_20_Contents">2 Have mercy upon me, O LORD; for <text:span text:style-name="T4">I am</text:span> weak: O LORD, heal me; for my bones are vexed.</text:p>
            <text:p text:style-name="Table_20_Contents"/>
            <text:p text:style-name="P4">Psalms 6:6</text:p>
            <text:p text:style-name="Table_20_Contents">I am weary with my groaning; all the night make I my bed to swim; I water my couch with my tears.</text:p>
            <text:p text:style-name="Table_20_Contents"/>
            <text:p text:style-name="P4">Psalms 10:1</text:p>
            <text:p text:style-name="Table_20_Contents">Why standest thou afar off, O LORD? why hidest thou thyself in times of trouble?</text:p>
            <text:p text:style-name="Table_20_Contents"/>
            <text:p text:style-name="P4">Psalms 12:1</text:p>
            <text:p text:style-name="Table_20_Contents">Help, LORD; for the godly man ceaseth; for the faithful fail from among the children of men.</text:p>
            <text:p text:style-name="Table_20_Contents"/>
            <text:p text:style-name="P4">Psalms 13:1</text:p>
            <text:p text:style-name="Table_20_Contents">How long wilt thou forget me, O LORD? for ever? how long wilt thou hide thy face from me?</text:p>
          </table:table-cell>
        </table:table-row>
      </table:table>
      <text:p text:style-name="P7"/>
      <table:table table:name="Table5" table:style-name="Table5">
        <table:table-column table:style-name="Table5.A"/>
        <text:soft-page-break/>
        <table:table-row table:style-name="Table5.1">
          <table:table-cell table:style-name="Table5.A1" office:value-type="string">
            <text:p text:style-name="P4">Psalms 116:1</text:p>
            <text:p text:style-name="Table_20_Contents">I love the LORD, because he hath heard my voice and my supplications.</text:p>
            <text:p text:style-name="Table_20_Contents"/>
            <text:p text:style-name="P4">Psalms 18:3</text:p>
            <text:p text:style-name="Table_20_Contents">I will call upon the LORD, who is worthy to be praised: so shall I be saved from mine enemies.</text:p>
            <text:p text:style-name="Table_20_Contents"/>
            <text:p text:style-name="P4">Psalms 18:6</text:p>
            <text:p text:style-name="Table_20_Contents">In my distress I called upon the LORD, and cried unto my God: he heard my voice out of his temple, and my cry came before him, even into his ears.</text:p>
          </table:table-cell>
        </table:table-row>
      </table:table>
      <text:p text:style-name="P8"/>
      <table:table table:name="Table6" table:style-name="Table6">
        <table:table-column table:style-name="Table6.A"/>
        <table:table-row>
          <table:table-cell table:style-name="Table6.A1" office:value-type="string">
            <text:p text:style-name="P4">2 Corinthians 5:21</text:p>
            <text:p text:style-name="Table_20_Contents">For he hath made him to be sin for us, who knew no sin; that we might be made the righteousness of God in him.</text:p>
          </table:table-cell>
        </table:table-row>
      </table:table>
      <text:p text:style-name="P8"/>
      <table:table table:name="Table7" table:style-name="Table7">
        <table:table-column table:style-name="Table7.A"/>
        <table:table-row>
          <table:table-cell table:style-name="Table7.A1" office:value-type="string">
            <text:p text:style-name="P4">Isaiah 53:4</text:p>
            <text:p text:style-name="Table_20_Contents">Surely he hath borne our griefs, and carried our sorrows: yet we did esteem him stricken, smitten of God, and afflicted.</text:p>
            <text:p text:style-name="Table_20_Contents"/>
            <text:p text:style-name="P4">Isaiah 53:3</text:p>
            <text:p text:style-name="Table_20_Contents">He is despised and rejected of men; a man of sorrows, and acquainted with grief: and we hid as it were our faces from him; he was despised, and we esteemed him not.</text:p>
          </table:table-cell>
        </table:table-row>
      </table:table>
      <text:p text:style-name="P8"/>
      <table:table table:name="Table8" table:style-name="Table8">
        <table:table-column table:style-name="Table8.A"/>
        <table:table-row>
          <table:table-cell table:style-name="Table8.A1" office:value-type="string">
            <text:p text:style-name="P4">Hebrews 12:3</text:p>
            <text:p text:style-name="Table_20_Contents">For consider him that endured such contradiction of sinners against himself, lest ye be wearied and faint in your minds.</text:p>
          </table:table-cell>
        </table:table-row>
      </table:table>
      <text:p text:style-name="Text_20_body"/>
      <table:table table:name="Table9" table:style-name="Table9">
        <table:table-column table:style-name="Table9.A"/>
        <table:table-row>
          <table:table-cell table:style-name="Table9.A1" office:value-type="string">
            <text:p text:style-name="P4">Romans 5:6</text:p>
            <text:p text:style-name="Table_20_Contents">For when we were yet without strength, in due time Christ died for the ungodly.</text:p>
          </table:table-cell>
        </table:table-row>
      </table:table>
      <text:p text:style-name="P3"/>
      <table:table table:name="Table10" table:style-name="Table10">
        <table:table-column table:style-name="Table10.A"/>
        <table:table-row>
          <table:table-cell table:style-name="Table10.A1" office:value-type="string">
            <text:p text:style-name="P4">Romans 5:7</text:p>
            <text:p text:style-name="Table_20_Contents">For scarcely for a righteous man will one die: yet peradventure for a good man some would even dare to die.</text:p>
            <text:p text:style-name="Table_20_Contents"/>
            <text:p text:style-name="P4">Romans 5:8</text:p>
            <text:p text:style-name="Table_20_Contents">But God commendeth his love toward us, in that, while we were yet sinners, Christ died for us.</text:p>
          </table:table-cell>
        </table:table-row>
      </table:table>
      <text:p text:style-name="P3"/>
      <table:table table:name="Table11" table:style-name="Table11">
        <table:table-column table:style-name="Table11.A"/>
        <table:table-row>
          <table:table-cell table:style-name="Table11.A1" office:value-type="string">
            <text:p text:style-name="P4">Psalms 18:3-5</text:p>
            <text:p text:style-name="Table_20_Contents">3 I will call upon the LORD, who is worthy to be praised: so shall I be saved from mine enemies.</text:p>
            <text:p text:style-name="Table_20_Contents">4 The sorrows of death compassed me, and the floods of ungodly men made me afraid.</text:p>
            <text:p text:style-name="Table_20_Contents">5 The sorrows of hell compassed me about: the snares of death prevented me.</text:p>
          </table:table-cell>
        </table:table-row>
      </table:table>
      <text:p text:style-name="P3"/>
      <table:table table:name="Table12" table:style-name="Table12">
        <table:table-column table:style-name="Table12.A"/>
        <table:table-row table:style-name="Table12.1">
          <table:table-cell table:style-name="Table12.A1" office:value-type="string">
            <text:p text:style-name="P4">Psalms 116:1-3</text:p>
            <text:p text:style-name="Table_20_Contents">1 I love the LORD, because he hath heard my voice and my supplications.</text:p>
            <text:p text:style-name="Table_20_Contents">2 Because he hath inclined his ear unto me, therefore will I call upon him as long as I live.</text:p>
            <text:p text:style-name="Table_20_Contents">3 The sorrows of death compassed me, and the pains of hell gat hold upon me: I found trouble and sorrow.</text:p>
          </table:table-cell>
        </table:table-row>
      </table:table>
      <text:p text:style-name="P3"/>
      <table:table table:name="Table13" table:style-name="Table13">
        <table:table-column table:style-name="Table13.A"/>
        <text:soft-page-break/>
        <table:table-row table:style-name="Table13.1">
          <table:table-cell table:style-name="Table13.A1" office:value-type="string">
            <text:p text:style-name="P4">Psalms 21:12-13</text:p>
            <text:p text:style-name="Table_20_Contents">12 Therefore shalt thou make them turn their back, when thou shalt make ready thine arrows upon thy strings against the face of them.</text:p>
            <text:p text:style-name="Table_20_Contents">13 Be thou exalted, LORD, in thine own strength: so will we sing and praise thy power.</text:p>
          </table:table-cell>
        </table:table-row>
      </table:table>
      <text:p text:style-name="P3"/>
      <table:table table:name="Table14" table:style-name="Table14">
        <table:table-column table:style-name="Table14.A"/>
        <table:table-row>
          <table:table-cell table:style-name="Table14.A1" office:value-type="string">
            <text:p text:style-name="P4">Job 16:11-13</text:p>
            <text:p text:style-name="Table_20_Contents">11 God hath delivered me to the ungodly, and turned me over into the hands of the wicked.</text:p>
            <text:p text:style-name="Table_20_Contents">12 I was at ease, but he hath broken me asunder: he hath also taken me by my neck, and shaken me to pieces, and set me up for his mark.</text:p>
            <text:p text:style-name="Table_20_Contents">13 His archers compass me round about, he cleaveth my reins asunder, and doth not spare; he poureth out my gall upon the ground.</text:p>
          </table:table-cell>
        </table:table-row>
      </table:table>
      <text:p text:style-name="P3"/>
      <table:table table:name="Table15" table:style-name="Table15">
        <table:table-column table:style-name="Table15.A"/>
        <table:table-row table:style-name="Table15.1">
          <table:table-cell table:style-name="Table15.A1" office:value-type="string">
            <text:p text:style-name="P4">Isaiah 53:10</text:p>
            <text:p text:style-name="Table_20_Contents">Yet it pleased the LORD to bruise him; he hath put him to grief: when thou shalt make his soul an offering for sin, he shall see his seed, he shall prolong his days, and the pleasure of the LORD shall prosper in his hand.</text:p>
          </table:table-cell>
        </table:table-row>
      </table:table>
      <text:p text:style-name="P3"/>
      <table:table table:name="Table16" table:style-name="Table16">
        <table:table-column table:style-name="Table16.A"/>
        <table:table-row>
          <table:table-cell table:style-name="Table16.A1" office:value-type="string">
            <text:p text:style-name="P4">Isaiah 28:10</text:p>
            <text:p text:style-name="Table_20_Contents">For precept must be upon precept, precept upon precept; line upon line, line upon line; here a little, and there a little:</text:p>
          </table:table-cell>
        </table:table-row>
      </table:table>
      <text:p text:style-name="P3"/>
      <table:table table:name="Table17" table:style-name="Table17">
        <table:table-column table:style-name="Table17.A"/>
        <table:table-row>
          <table:table-cell table:style-name="Table17.A1" office:value-type="string">
            <text:p text:style-name="P4">1 Corinthians 15:3</text:p>
            <text:p text:style-name="Table_20_Contents">For I delivered unto you first of all that which I also received, how that Christ died for our sins according to the scriptures;</text:p>
          </table:table-cell>
        </table:table-row>
      </table:table>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style:text-properties officeooo:rsid="00099c67"/>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master-page-name="">
      <style:paragraph-properties fo:margin-top="0in" fo:margin-bottom="0in" style:contextual-spacing="false" fo:keep-together="always" fo:orphans="0" fo:widows="0" style:register-true="false" fo:text-indent="0in" style:auto-text-indent="false" style:page-number="auto"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26T09:33:10.554672941</meta:creation-date>
    <dc:title>default</dc:title>
    <meta:editing-duration>PT1H25M52S</meta:editing-duration>
    <meta:editing-cycles>50</meta:editing-cycles>
    <meta:generator>LibreOffice/25.8.4.2$Linux_X86_64 LibreOffice_project/0b6deb1565d6226fb81e7f54d104471baea763d5</meta:generator>
    <dc:date>2025-12-26T11:13:44.011418936</dc:date>
    <meta:document-statistic meta:table-count="17" meta:image-count="0" meta:object-count="0" meta:page-count="3" meta:paragraph-count="67" meta:word-count="903" meta:character-count="4742" meta:non-whitespace-character-count="3905"/>
    <meta:template xlink:type="simple" xlink:actuate="onRequest" xlink:title="default" xlink:href="../../../../../../../../../../home/wmcdannell/Templates/default.ott" meta:date="2025-12-26T09:33:09.924334387"/>
  </office:meta>
</office:document-meta>
</file>