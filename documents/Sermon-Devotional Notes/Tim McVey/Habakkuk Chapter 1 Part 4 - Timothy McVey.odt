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paragraph-rsid="00099c67"/>
    </style:style>
    <style:style style:name="P3" style:family="paragraph" style:parent-style-name="Table_20_Contents">
      <style:text-properties fo:color="#127622" loext:opacity="100%"/>
    </style:style>
    <style:style style:name="P4" style:family="paragraph" style:parent-style-name="Table_20_Contents">
      <style:text-properties fo:color="#127622" loext:opacity="100%" officeooo:rsid="007a9770" officeooo:paragraph-rsid="007a9770"/>
    </style:style>
    <style:style style:name="T1" style:family="text">
      <style:text-properties officeooo:rsid="00336675"/>
    </style:style>
    <style:style style:name="T2" style:family="text">
      <style:text-properties officeooo:rsid="006baaca"/>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text:span text:style-name="T2">4</text:span> – 2025-11-<text:span text:style-name="T2">20</text:span></text:p>
      <text:p text:style-name="P1"/>
      <text:p text:style-name="P2"><text:a xlink:type="simple" xlink:href="https://www.buzzsprout.com/1909318/episodes/18206149-habakkuk-chapter-1-part-4.mp3" text:style-name="Internet_20_link" text:visited-style-name="Visited_20_Internet_20_Link">https://www.buzzsprout.com/1909318/episodes/18206149-habakkuk-chapter-1-part-4.mp3</text:a></text:p>
      <text:p text:style-name="Text_20_body"/>
      <table:table table:name="Table1" table:style-name="Table1">
        <table:table-column table:style-name="Table1.A"/>
        <table:table-row>
          <table:table-cell table:style-name="Table1.A1" office:value-type="string">
            <text:p text:style-name="P3">Psalms 22:12</text:p>
            <text:p text:style-name="Table_20_Contents">Many bulls have compassed me: strong bulls of Bashan have beset me round.</text:p>
            <text:p text:style-name="Table_20_Contents"/>
            <text:p text:style-name="P3">Psalms 22:16</text:p>
            <text:p text:style-name="Table_20_Contents">For dogs have compassed me: the assembly of the wicked have inclosed me: they pierced my hands and my feet.</text:p>
          </table:table-cell>
        </table:table-row>
      </table:table>
      <text:p text:style-name="Text_20_body"/>
      <table:table table:name="Table2" table:style-name="Table2">
        <table:table-column table:style-name="Table2.A"/>
        <table:table-row>
          <table:table-cell table:style-name="Table2.A1" office:value-type="string">
            <text:p text:style-name="P3">Habakkuk 1:1</text:p>
            <text:p text:style-name="Table_20_Contents">The burden which Habakkuk the prophet <text:span text:style-name="T3">did see</text:span>.</text:p>
            <text:p text:style-name="Table_20_Contents"/>
            <text:p text:style-name="P3">2 Peter 1:21</text:p>
            <text:p text:style-name="Table_20_Contents">For the prophecy came not in old time by the will of man: but holy men of God spake as they were moved by the Holy Ghost.</text:p>
            <text:p text:style-name="Table_20_Contents"/>
            <text:p text:style-name="P3">1 Peter 1:11</text:p>
            <text:p text:style-name="Table_20_Contents">Searching what, or what manner of time the Spirit of Christ which was in them did signify, when it testified beforehand the sufferings of Christ, and the glory that should follow.</text:p>
          </table:table-cell>
        </table:table-row>
      </table:table>
      <text:p text:style-name="Text_20_body"/>
      <table:table table:name="Table3" table:style-name="Table3">
        <table:table-column table:style-name="Table3.A"/>
        <table:table-row>
          <table:table-cell table:style-name="Table3.A1" office:value-type="string">
            <text:p text:style-name="P3">Habakkuk 1:2</text:p>
            <text:p text:style-name="Table_20_Contents">O LORD, how long shall I cry, and thou wilt not hear! even cry out unto thee of violence, and thou wilt not save!</text:p>
          </table:table-cell>
        </table:table-row>
      </table:table>
      <text:p text:style-name="Text_20_body"/>
      <table:table table:name="Table4" table:style-name="Table4">
        <table:table-column table:style-name="Table4.A"/>
        <table:table-row>
          <table:table-cell table:style-name="Table4.A1" office:value-type="string">
            <text:p text:style-name="P3">Isaiah 53:5-6</text:p>
            <text:p text:style-name="Table_20_Contents">5 But he was wounded for our transgressions, he was bruised for our iniquities: the chastisement of our peace was upon him; and with his stripes we are healed.</text:p>
            <text:p text:style-name="Table_20_Contents">6 All we like sheep have gone astray; we have turned every one to his own way; and the LORD hath laid on him the iniquity of us all.</text:p>
          </table:table-cell>
        </table:table-row>
      </table:table>
      <text:p text:style-name="Text_20_body"/>
      <table:table table:name="Table5" table:style-name="Table5">
        <table:table-column table:style-name="Table5.A"/>
        <table:table-row>
          <table:table-cell table:style-name="Table5.A1" office:value-type="string">
            <text:p text:style-name="P3">Psalms 55:17</text:p>
            <text:p text:style-name="Table_20_Contents">Evening, and morning, and at noon, will I pray, and cry aloud: and he shall hear my voice.</text:p>
          </table:table-cell>
        </table:table-row>
      </table:table>
      <text:p text:style-name="Text_20_body"/>
      <table:table table:name="Table6" table:style-name="Table6">
        <table:table-column table:style-name="Table6.A"/>
        <table:table-row>
          <table:table-cell table:style-name="Table6.A1" office:value-type="string">
            <text:p text:style-name="P4">2 Samuel 22</text:p>
            <text:p text:style-name="P4">Psalm 18</text:p>
          </table:table-cell>
        </table:table-row>
      </table:table>
      <text:p text:style-name="Text_20_body"/>
      <table:table table:name="Table7" table:style-name="Table7">
        <table:table-column table:style-name="Table7.A"/>
        <table:table-row>
          <table:table-cell table:style-name="Table7.A1" office:value-type="string">
            <text:p text:style-name="P3">Ephesians 2:1</text:p>
            <text:p text:style-name="Table_20_Contents">And you hath he quickened, who were dead in trespasses and sins;</text:p>
          </table:table-cell>
        </table:table-row>
      </table:table>
      <text:p text:style-name="Text_20_body"/>
      <table:table table:name="Table8" table:style-name="Table8">
        <table:table-column table:style-name="Table8.A"/>
        <table:table-row>
          <table:table-cell table:style-name="Table8.A1" office:value-type="string">
            <text:p text:style-name="P3">Psalms 34:6</text:p>
            <text:p text:style-name="Table_20_Contents">This poor man cried, and the LORD heard him, and saved him out of all his troubles.</text:p>
          </table:table-cell>
        </table:table-row>
      </table:table>
      <text:p text:style-name="Text_20_body"/>
      <table:table table:name="Table9" table:style-name="Table9">
        <table:table-column table:style-name="Table9.A"/>
        <table:table-row>
          <table:table-cell table:style-name="Table9.A1" office:value-type="string">
            <text:p text:style-name="P3">Psalms 16:10</text:p>
            <text:p text:style-name="Table_20_Contents">For thou wilt not leave my soul in hell; neither wilt thou suffer thine Holy One to see corruption.</text:p>
          </table:table-cell>
        </table:table-row>
        <table:table-row>
          <table:table-cell table:style-name="Table9.A2" office:value-type="string">
            <text:p text:style-name="P3">Acts 2:27</text:p>
            <text:p text:style-name="Table_20_Contents">Because thou wilt not leave my soul in hell, neither wilt thou suffer thine Holy One to see corruption.</text:p>
          </table:table-cell>
        </table:table-row>
      </table:table>
      <text:p text:style-name="Text_20_body"/>
      <table:table table:name="Table10" table:style-name="Table10">
        <table:table-column table:style-name="Table10.A"/>
        <text:soft-page-break/>
        <table:table-row>
          <table:table-cell table:style-name="Table10.A1" office:value-type="string">
            <text:p text:style-name="P3">Psalms 7:1-2</text:p>
            <text:p text:style-name="Table_20_Contents">1 O LORD my God, in thee do I put my trust: save me from all them that persecute me, and deliver me:</text:p>
            <text:p text:style-name="Table_20_Contents">2 Lest he tear my soul like a lion, rending it in pieces, while there is none to deliver.</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9H41M1S</meta:editing-duration>
    <meta:editing-cycles>115</meta:editing-cycles>
    <meta:generator>LibreOffice/26.2.4.2$Linux_X86_64 LibreOffice_project/64a984c51f4702dbd3710b13428c673a2f1292e7</meta:generator>
    <dc:date>2026-07-11T12:20:35.965850568</dc:date>
    <meta:document-statistic meta:table-count="10" meta:image-count="0" meta:object-count="0" meta:page-count="2" meta:paragraph-count="32" meta:word-count="351" meta:character-count="1863" meta:non-whitespace-character-count="1543"/>
    <meta:template xlink:type="simple" xlink:actuate="onRequest" xlink:title="default" xlink:href="../../../../../../Templates/default.ott" meta:date="2025-12-26T16:53:52.743179276"/>
  </office:meta>
</office:document-meta>
</file>