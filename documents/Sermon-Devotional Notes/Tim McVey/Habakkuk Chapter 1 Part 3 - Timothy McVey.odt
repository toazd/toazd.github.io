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officeooo:rsid="00590dfd" officeooo:paragraph-rsid="00590dfd"/>
    </style:style>
    <style:style style:name="P5" style:family="paragraph" style:parent-style-name="Table_20_Contents">
      <style:text-properties fo:color="#127622" loext:opacity="100%" officeooo:rsid="00590dfd" officeooo:paragraph-rsid="00590dfd"/>
    </style:style>
    <style:style style:name="P6" style:family="paragraph" style:parent-style-name="Table_20_Contents">
      <style:text-properties officeooo:rsid="005b8004" officeooo:paragraph-rsid="005b8004"/>
    </style:style>
    <style:style style:name="P7" style:family="paragraph" style:parent-style-name="Table_20_Contents">
      <style:text-properties fo:color="#127622" loext:opacity="100%" officeooo:rsid="005b8004" officeooo:paragraph-rsid="005b8004"/>
    </style:style>
    <style:style style:name="P8" style:family="paragraph" style:parent-style-name="Table_20_Contents">
      <style:text-properties fo:color="#127622" loext:opacity="100%" officeooo:rsid="0061c98b" officeooo:paragraph-rsid="0061c98b"/>
    </style:style>
    <style:style style:name="P9" style:family="paragraph" style:parent-style-name="Table_20_Contents">
      <style:text-properties officeooo:rsid="0061c98b" officeooo:paragraph-rsid="0061c98b"/>
    </style:style>
    <style:style style:name="P10" style:family="paragraph" style:parent-style-name="Table_20_Contents">
      <style:text-properties fo:color="#ff0000" loext:opacity="100%" officeooo:rsid="005b8004" officeooo:paragraph-rsid="005b8004"/>
    </style:style>
    <style:style style:name="T1" style:family="text">
      <style:text-properties officeooo:rsid="00336675"/>
    </style:style>
    <style:style style:name="T2" style:family="text">
      <style:text-properties officeooo:rsid="003a390d"/>
    </style:style>
    <style:style style:name="T3" style:family="text">
      <style:text-properties officeooo:rsid="0050327f"/>
    </style:style>
    <style:style style:name="T4" style:family="text">
      <style:text-properties fo:background-color="#fff5ce"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2</text:span> – 2025-11-1<text:span text:style-name="T3">9</text:span></text:p>
      <text:p text:style-name="P1"/>
      <text:p text:style-name="P2"><text:a xlink:type="simple" xlink:href="https://www.buzzsprout.com/1909318/episodes/18206146-habakkuk-chapter-1-part-3.mp3" text:style-name="Internet_20_link" text:visited-style-name="Visited_20_Internet_20_Link">https://www.buzzsprout.com/1909318/episodes/18206146-habakkuk-chapter-1-part-3.mp3</text:a></text:p>
      <text:p text:style-name="Text_20_body"/>
      <table:table table:name="Table1" table:style-name="Table1">
        <table:table-column table:style-name="Table1.A"/>
        <table:table-row table:style-name="Table1.1">
          <table:table-cell table:style-name="Table1.A1" office:value-type="string">
            <text:p text:style-name="P3">Psalms 22:1-2</text:p>
            <text:p text:style-name="Table_20_Contents">1 My God, my God, why hast thou forsaken me? why art thou so far from helping me, and from the words of my roaring?</text:p>
            <text:p text:style-name="Table_20_Contents">2 O my God, I cry in the daytime, but thou hearest not; and in the night season, and am not silent.</text:p>
            <text:p text:style-name="Table_20_Contents"/>
            <text:p text:style-name="P3">Psalms 27:7</text:p>
            <text:p text:style-name="Table_20_Contents">Hear, O LORD, when I cry with my voice: have mercy also upon me, and answer me.</text:p>
            <text:p text:style-name="Table_20_Contents"/>
            <text:p text:style-name="P3">Psalms 55:17</text:p>
            <text:p text:style-name="Table_20_Contents">Evening, and morning, and at noon, will I pray, and cry aloud: and he shall hear my voice.</text:p>
            <text:p text:style-name="Table_20_Contents"/>
            <text:p text:style-name="P3">Psalms 28:1-2</text:p>
            <text:p text:style-name="Table_20_Contents">1 Unto thee will I cry, O LORD my rock; be not silent to me: lest, if thou be silent to me, I become like them that go down into the pit.</text:p>
            <text:p text:style-name="Table_20_Contents">2 Hear the voice of my supplications, when I cry unto thee, when I lift up my hands toward thy holy oracle.</text:p>
            <text:p text:style-name="Table_20_Contents"/>
            <text:p text:style-name="P3">Psalms 34:15</text:p>
            <text:p text:style-name="Table_20_Contents">The eyes of the LORD are upon the righteous, and his ears are open unto <text:span text:style-name="T4">their</text:span> cry.</text:p>
            <text:p text:style-name="Table_20_Contents"/>
            <text:p text:style-name="P3">Psalms 34:17</text:p>
            <text:p text:style-name="Table_20_Contents">The righteous cry, and the LORD heareth, and delivereth them out of all <text:span text:style-name="T4">their</text:span> troubles.</text:p>
            <text:p text:style-name="Table_20_Contents"/>
            <text:p text:style-name="P3">Psalms 34:19</text:p>
            <text:p text:style-name="Table_20_Contents">Many are the afflictions of the righteous: but the LORD delivereth <text:span text:style-name="T5">him</text:span> out of them all.</text:p>
            <text:p text:style-name="Table_20_Contents"/>
            <text:p text:style-name="P3">Psalms 34:6</text:p>
            <text:p text:style-name="Table_20_Contents">This poor man cried, and the LORD heard <text:span text:style-name="T5">him</text:span>, and saved <text:span text:style-name="T5">him</text:span> out of all his troubles.</text:p>
            <text:p text:style-name="Table_20_Contents"/>
            <text:p text:style-name="P3">Psalms 40:1-3</text:p>
            <text:p text:style-name="Table_20_Contents">1 I waited patiently for the LORD; and he inclined unto me, and heard my cry.</text:p>
            <text:p text:style-name="Table_20_Contents">2 He brought me up also out of an horrible pit, out of the miry clay, and set my feet upon a rock, and established my goings.</text:p>
            <text:p text:style-name="Table_20_Contents">3 And he hath put a new song in my mouth, even praise unto our God: many shall see it, and fear, and shall trust in the LORD.</text:p>
            <text:p text:style-name="Table_20_Contents"/>
            <text:p text:style-name="P4">To the chief Musician upon Shoshannim, A Psalm of David.</text:p>
            <text:p text:style-name="P5">Psalms 69:1-3</text:p>
            <text:p text:style-name="P4">1 Save me, O God; for the waters are come in unto my soul.</text:p>
            <text:p text:style-name="P4">2 I sink in deep mire, where there is no standing: I am come into deep waters, where the floods overflow me.</text:p>
            <text:p text:style-name="P4">3 <text:span text:style-name="T5">I am</text:span><text:span text:style-name="T4"> weary of my crying</text:span>: my throat is dried: mine eyes fail while I wait for my God.</text:p>
            <text:p text:style-name="P4"/>
            <text:p text:style-name="P6">To the chief Musician on Neginoth, Maschil, A Psalm of David.</text:p>
            <text:p text:style-name="P7">Psalms 55:1-4</text:p>
            <text:p text:style-name="P6">1 Give ear to my prayer, O God; and hide not thyself from my supplication.</text:p>
            <text:p text:style-name="P6">2 Attend unto me, and hear me: I mourn in my complaint, and make a noise;</text:p>
            <text:p text:style-name="P6">3 Because of the voice of the enemy, because of the oppression of the wicked: for they cast iniquity upon me, and in wrath they hate me.</text:p>
            <text:p text:style-name="P6">4 My heart is sore pained within me: and <text:span text:style-name="T5">the terrors of death are fallen upon me</text:span>.</text:p>
            <text:p text:style-name="P6"><text:soft-page-break/></text:p>
            <text:p text:style-name="P7">1 Corinthians 15:55</text:p>
            <text:p text:style-name="P6">O death, where is thy sting? O grave, where is thy victory?</text:p>
            <text:p text:style-name="P6"/>
            <text:p text:style-name="P7">Psalms 55:8-9</text:p>
            <text:p text:style-name="P6">8 I would hasten my escape from the windy storm and tempest.</text:p>
            <text:p text:style-name="P6">9 Destroy, O Lord, and divide their tongues: for I have seen violence and strife in the city.</text:p>
            <text:p text:style-name="P6"/>
            <text:p text:style-name="P7">Psalms 72:14</text:p>
            <text:p text:style-name="P6">He shall redeem their soul from deceit and violence: and precious shall their blood be in his sight.</text:p>
            <text:p text:style-name="P6"/>
            <text:p text:style-name="P7">Psalms 72:12</text:p>
            <text:p text:style-name="P6">For he shall deliver the needy when he crieth; the poor also, and him that hath no helper.</text:p>
            <text:p text:style-name="P6"/>
            <text:p text:style-name="P7">Psalms 35:10</text:p>
            <text:p text:style-name="P6">All my bones shall say, LORD, who is like unto thee, which deliverest the poor from him that is too strong for him, yea, the poor and the needy from him that spoileth him?</text:p>
            <text:p text:style-name="P6"/>
            <text:p text:style-name="P8">Psalm 18</text:p>
            <text:p text:style-name="P9"/>
            <text:p text:style-name="P7">Matthew 12:29</text:p>
            <text:p text:style-name="P10">Or else how can one enter into a strong man's house, and spoil his goods, except he first bind the strong man? and then he will spoil his house.</text:p>
            <text:p text:style-name="P6"/>
            <text:p text:style-name="P7">Mark 3:27</text:p>
            <text:p text:style-name="P10">No man can enter into a strong man's house, and spoil his goods, except he will first bind the strong man; and then he will spoil his house.</text:p>
            <text:p text:style-name="P10"/>
            <text:p text:style-name="P7">Revelation 1:18</text:p>
            <text:p text:style-name="P10">I am he that liveth, and was dead; and, behold, I am alive for evermore, Amen; and have the keys of hell and of death.</text:p>
            <text:p text:style-name="P10"/>
            <text:p text:style-name="P3">Psalms 35:11-12</text:p>
            <text:p text:style-name="Table_20_Contents">11 False witnesses did rise up; they laid to my charge things that I knew not.</text:p>
            <text:p text:style-name="Table_20_Contents">12 They rewarded me evil for good to the spoiling of my soul.</text:p>
            <text:p text:style-name="Table_20_Contents"/>
            <text:p text:style-name="P3">Psalms 18:4-5</text:p>
            <text:p text:style-name="Table_20_Contents">4 The sorrows of death compassed me, and the floods of ungodly men made me afraid.</text:p>
            <text:p text:style-name="Table_20_Contents">5 The sorrows of hell compassed me about: the snares of death prevented me.</text:p>
            <text:p text:style-name="Table_20_Contents"/>
            <text:p text:style-name="P3">Psalms 22:12</text:p>
            <text:p text:style-name="Table_20_Contents">Many bulls have compassed me: strong bulls of Bashan have beset me round.</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8H32M53S</meta:editing-duration>
    <meta:editing-cycles>94</meta:editing-cycles>
    <meta:generator>LibreOffice/25.8.4.2$Linux_X86_64 LibreOffice_project/0b6deb1565d6226fb81e7f54d104471baea763d5</meta:generator>
    <dc:date>2025-12-27T11:52:32.472305095</dc:date>
    <meta:document-statistic meta:table-count="1" meta:image-count="0" meta:object-count="0" meta:page-count="2" meta:paragraph-count="61" meta:word-count="747" meta:character-count="3790" meta:non-whitespace-character-count="3103"/>
    <meta:template xlink:type="simple" xlink:actuate="onRequest" xlink:title="default" xlink:href="../../../../../../../../../../home/wmcdannell/Templates/default.ott" meta:date="2025-12-26T16:53:52.743179276"/>
  </office:meta>
</office:document-meta>
</file>