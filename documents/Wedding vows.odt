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text-properties officeooo:paragraph-rsid="00e4c269"/>
    </style:style>
    <style:style style:name="P2" style:family="paragraph" style:parent-style-name="Standard">
      <style:paragraph-properties fo:text-align="center" style:justify-single-word="false"/>
      <style:text-properties officeooo:rsid="00d042ed" officeooo:paragraph-rsid="00e4c269"/>
    </style:style>
    <style:style style:name="P3" style:family="paragraph" style:parent-style-name="Standard" style:list-style-name="L1">
      <style:text-properties officeooo:rsid="002f7c4c" officeooo:paragraph-rsid="002f7c4c"/>
    </style:style>
    <style:style style:name="P4" style:family="paragraph" style:parent-style-name="Standard" style:list-style-name="L1">
      <style:text-properties officeooo:rsid="009e35e2" officeooo:paragraph-rsid="009e35e2"/>
    </style:style>
    <style:style style:name="P5" style:family="paragraph" style:parent-style-name="Standard" style:list-style-name="L1">
      <style:text-properties officeooo:rsid="009e4f74" officeooo:paragraph-rsid="009e4f74"/>
    </style:style>
    <style:style style:name="P6" style:family="paragraph" style:parent-style-name="Standard">
      <style:text-properties officeooo:rsid="009e4f74" officeooo:paragraph-rsid="009e4f74"/>
    </style:style>
    <style:style style:name="P7" style:family="paragraph" style:parent-style-name="Standard">
      <style:text-properties officeooo:paragraph-rsid="00ca63c6"/>
    </style:style>
    <style:style style:name="P8" style:family="paragraph" style:parent-style-name="Standard" style:list-style-name="L2">
      <style:text-properties officeooo:rsid="001a6674" officeooo:paragraph-rsid="001a6674"/>
    </style:style>
    <style:style style:name="P9" style:family="paragraph" style:parent-style-name="Standard" style:list-style-name="L2">
      <style:text-properties officeooo:rsid="0061d0d0" officeooo:paragraph-rsid="0061d0d0"/>
    </style:style>
    <style:style style:name="P10" style:family="paragraph" style:parent-style-name="Standard" style:list-style-name="L2">
      <style:text-properties officeooo:rsid="0024f1e0" officeooo:paragraph-rsid="0024f1e0"/>
    </style:style>
    <style:style style:name="P11" style:family="paragraph" style:parent-style-name="Table_20_Contents">
      <style:text-properties officeooo:paragraph-rsid="00146581"/>
    </style:style>
    <style:style style:name="P12" style:family="paragraph" style:parent-style-name="Standard" style:list-style-name="L3">
      <style:text-properties officeooo:rsid="0026eb63" officeooo:paragraph-rsid="0026eb63"/>
    </style:style>
    <style:style style:name="P13" style:family="paragraph" style:parent-style-name="Standard" style:list-style-name="L3">
      <style:text-properties officeooo:rsid="0026fcfb" officeooo:paragraph-rsid="00636fbf"/>
    </style:style>
    <style:style style:name="P14" style:family="paragraph" style:parent-style-name="Standard">
      <style:text-properties officeooo:rsid="0026fcfb" officeooo:paragraph-rsid="00636fbf"/>
    </style:style>
    <style:style style:name="P15" style:family="paragraph" style:parent-style-name="Standard" style:list-style-name="L4">
      <style:text-properties officeooo:rsid="006c562d" officeooo:paragraph-rsid="006c562d"/>
    </style:style>
    <style:style style:name="P16" style:family="paragraph" style:parent-style-name="Standard" style:list-style-name="L5">
      <style:text-properties officeooo:rsid="0076860b" officeooo:paragraph-rsid="0076860b"/>
    </style:style>
    <style:style style:name="P17" style:family="paragraph" style:parent-style-name="Table_20_Contents">
      <style:text-properties officeooo:paragraph-rsid="0015d033"/>
    </style:style>
    <style:style style:name="P18" style:family="paragraph" style:parent-style-name="Table_20_Contents">
      <style:text-properties fo:color="#ff0000" loext:opacity="100%" officeooo:paragraph-rsid="0015d033"/>
    </style:style>
    <style:style style:name="P19" style:family="paragraph" style:parent-style-name="Table_20_Contents">
      <style:text-properties fo:color="#127622" loext:opacity="100%" officeooo:paragraph-rsid="0080c3dd"/>
    </style:style>
    <style:style style:name="P20" style:family="paragraph" style:parent-style-name="Table_20_Contents">
      <style:text-properties style:use-window-font-color="true" loext:opacity="0%" officeooo:paragraph-rsid="0080c3dd"/>
    </style:style>
    <style:style style:name="P21" style:family="paragraph" style:parent-style-name="Standard" style:list-style-name="L6">
      <style:text-properties officeooo:rsid="002c6198" officeooo:paragraph-rsid="00d4e559"/>
    </style:style>
    <style:style style:name="P22" style:family="paragraph" style:parent-style-name="Standard" style:list-style-name="L6">
      <style:text-properties officeooo:rsid="00d38baa" officeooo:paragraph-rsid="00d4e559"/>
    </style:style>
    <style:style style:name="P23" style:family="paragraph" style:parent-style-name="Standard" style:list-style-name="L6">
      <style:text-properties officeooo:rsid="00d709c3" officeooo:paragraph-rsid="00d709c3"/>
    </style:style>
    <style:style style:name="P24" style:family="paragraph" style:parent-style-name="Standard" style:list-style-name="L6">
      <style:text-properties officeooo:rsid="002dacd1" officeooo:paragraph-rsid="002dacd1"/>
    </style:style>
    <style:style style:name="P25" style:family="paragraph" style:parent-style-name="Standard" style:list-style-name="L6">
      <style:text-properties officeooo:rsid="002db78c" officeooo:paragraph-rsid="002db78c"/>
    </style:style>
    <style:style style:name="P26" style:family="paragraph" style:parent-style-name="Standard">
      <style:text-properties officeooo:rsid="002db78c" officeooo:paragraph-rsid="002db78c"/>
    </style:style>
    <style:style style:name="P27" style:family="paragraph" style:parent-style-name="Standard">
      <style:text-properties officeooo:rsid="00339aef" officeooo:paragraph-rsid="00978570"/>
    </style:style>
    <style:style style:name="P28" style:family="paragraph" style:parent-style-name="Table_20_Contents" style:list-style-name="L7">
      <style:text-properties officeooo:rsid="008ad5f7" officeooo:paragraph-rsid="00b6dd63"/>
    </style:style>
    <style:style style:name="P29" style:family="paragraph" style:parent-style-name="Table_20_Contents">
      <style:text-properties officeooo:rsid="008ad5f7" officeooo:paragraph-rsid="00978570"/>
    </style:style>
    <style:style style:name="P30" style:family="paragraph" style:parent-style-name="Standard">
      <style:text-properties officeooo:rsid="00844430" officeooo:paragraph-rsid="00978570"/>
    </style:style>
    <style:style style:name="P31" style:family="paragraph" style:parent-style-name="Standard">
      <style:text-properties officeooo:rsid="008c9724" officeooo:paragraph-rsid="009b55cc"/>
    </style:style>
    <style:style style:name="P32" style:family="paragraph" style:parent-style-name="Standard">
      <style:text-properties officeooo:rsid="002db78c" officeooo:paragraph-rsid="00355dcb"/>
    </style:style>
    <style:style style:name="P33" style:family="paragraph" style:parent-style-name="Standard">
      <style:text-properties officeooo:rsid="00339aef" officeooo:paragraph-rsid="00339aef"/>
    </style:style>
    <style:style style:name="P34" style:family="paragraph" style:parent-style-name="Table_20_Contents">
      <style:text-properties officeooo:paragraph-rsid="009b9e2b"/>
    </style:style>
    <style:style style:name="P35" style:family="paragraph" style:parent-style-name="Standard">
      <style:text-properties officeooo:rsid="0031bd11" officeooo:paragraph-rsid="0031bd11"/>
    </style:style>
    <style:style style:name="P36" style:family="paragraph" style:parent-style-name="Standard">
      <style:text-properties officeooo:rsid="00486884" officeooo:paragraph-rsid="00486884"/>
    </style:style>
    <style:style style:name="P37" style:family="paragraph" style:parent-style-name="Standard" style:list-style-name="L8">
      <style:text-properties officeooo:rsid="00c30a20" officeooo:paragraph-rsid="00c30a20"/>
    </style:style>
    <style:style style:name="P38" style:family="paragraph" style:parent-style-name="Standard" style:list-style-name="L8">
      <style:text-properties officeooo:rsid="00486884" officeooo:paragraph-rsid="00486884"/>
    </style:style>
    <style:style style:name="P39" style:family="paragraph" style:parent-style-name="Standard" style:list-style-name="L8">
      <style:text-properties officeooo:rsid="00c447c9" officeooo:paragraph-rsid="00c447c9"/>
    </style:style>
    <style:style style:name="P40" style:family="paragraph" style:parent-style-name="Standard">
      <style:text-properties officeooo:rsid="00c447c9" officeooo:paragraph-rsid="00c447c9"/>
    </style:style>
    <style:style style:name="P41" style:family="paragraph" style:parent-style-name="Standard">
      <style:text-properties officeooo:rsid="00533599" officeooo:paragraph-rsid="005a5a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66603b"/>
    </style:style>
    <style:style style:name="T3" style:family="text">
      <style:text-properties officeooo:rsid="00c5c8ed"/>
    </style:style>
    <style:style style:name="T4" style:family="text">
      <style:text-properties officeooo:rsid="006559a1"/>
    </style:style>
    <style:style style:name="T5" style:family="text">
      <style:text-properties officeooo:rsid="00a44d4c"/>
    </style:style>
    <style:style style:name="T6" style:family="text">
      <style:text-properties officeooo:rsid="0065b706"/>
    </style:style>
    <style:style style:name="T7" style:family="text">
      <style:text-properties fo:color="#127622" loext:opacity="100%" officeooo:rsid="0065b706"/>
    </style:style>
    <style:style style:name="T8" style:family="text">
      <style:text-properties officeooo:rsid="00a567f1"/>
    </style:style>
    <style:style style:name="T9" style:family="text">
      <style:text-properties officeooo:rsid="00d106b8"/>
    </style:style>
    <style:style style:name="T10" style:family="text">
      <style:text-properties fo:color="#127622" loext:opacity="100%" officeooo:rsid="00a6ec76"/>
    </style:style>
    <style:style style:name="T11" style:family="text">
      <style:text-properties officeooo:rsid="00a6ec76"/>
    </style:style>
    <style:style style:name="T12" style:family="text">
      <style:text-properties fo:color="#127622" loext:opacity="100%" officeooo:rsid="00a567f1"/>
    </style:style>
    <style:style style:name="T13" style:family="text">
      <style:text-properties fo:color="#127622" loext:opacity="100%" officeooo:rsid="00c7505a"/>
    </style:style>
    <style:style style:name="T14" style:family="text">
      <style:text-properties officeooo:rsid="00cc0d4b"/>
    </style:style>
    <style:style style:name="T15" style:family="text">
      <style:text-properties fo:color="#127622" loext:opacity="100%" officeooo:rsid="00cc0d4b"/>
    </style:style>
    <style:style style:name="T16" style:family="text">
      <style:text-properties fo:color="#127622" loext:opacity="100%"/>
    </style:style>
    <style:style style:name="T17" style:family="text">
      <style:text-properties fo:color="#127622" loext:opacity="100%" officeooo:rsid="00aa1423"/>
    </style:style>
    <style:style style:name="T18" style:family="text">
      <style:text-properties style:text-position="33% 80%"/>
    </style:style>
    <style:style style:name="T19" style:family="text">
      <style:text-properties fo:background-color="#fff5ce" loext:char-shading-value="0"/>
    </style:style>
    <style:style style:name="T20" style:family="text">
      <style:text-properties fo:background-color="#ffdbb6" loext:char-shading-value="0"/>
    </style:style>
    <style:style style:name="T21" style:family="text">
      <style:text-properties officeooo:rsid="003169c1"/>
    </style:style>
    <style:style style:name="T22" style:family="text">
      <style:text-properties officeooo:rsid="00a8616e"/>
    </style:style>
    <style:style style:name="T23" style:family="text">
      <style:text-properties officeooo:rsid="00c881df"/>
    </style:style>
    <style:style style:name="T24" style:family="text">
      <style:text-properties officeooo:rsid="00ca63c6"/>
    </style:style>
    <style:style style:name="T25" style:family="text">
      <style:text-properties fo:font-style="italic" officeooo:rsid="00ca63c6" style:font-style-asian="italic" style:font-style-complex="italic"/>
    </style:style>
    <style:style style:name="T26" style:family="text">
      <style:text-properties fo:color="#127622" loext:opacity="100%" officeooo:rsid="00ca63c6"/>
    </style:style>
    <style:style style:name="T27" style:family="text">
      <style:text-properties officeooo:rsid="00d224d1"/>
    </style:style>
    <style:style style:name="T28" style:family="text">
      <style:text-properties officeooo:rsid="00d25f16"/>
    </style:style>
    <style:style style:name="T29" style:family="text">
      <style:text-properties fo:color="#127622" loext:opacity="100%" officeooo:rsid="00d224d1"/>
    </style:style>
    <style:style style:name="T30" style:family="text">
      <style:text-properties officeooo:rsid="002592b7"/>
    </style:style>
    <style:style style:name="T31" style:family="text">
      <style:text-properties style:text-position="33% 80%" officeooo:rsid="00146581"/>
    </style:style>
    <style:style style:name="T32" style:family="text">
      <style:text-properties fo:color="#ff0000" loext:opacity="100%"/>
    </style:style>
    <style:style style:name="T33" style:family="text">
      <style:text-properties fo:color="#ff0000" loext:opacity="100%" fo:background-color="#ffdbb6" loext:char-shading-value="0"/>
    </style:style>
    <style:style style:name="T34" style:family="text">
      <style:text-properties fo:color="#ff0000" loext:opacity="100%" fo:background-color="#fff5ce" loext:char-shading-value="0"/>
    </style:style>
    <style:style style:name="T35" style:family="text">
      <style:text-properties officeooo:rsid="00d4e559"/>
    </style:style>
    <style:style style:name="T36" style:family="text">
      <style:text-properties fo:color="#127622" loext:opacity="100%" officeooo:rsid="00d4e559"/>
    </style:style>
    <style:style style:name="T37" style:family="text">
      <style:text-properties officeooo:rsid="00d59578"/>
    </style:style>
    <style:style style:name="T38" style:family="text">
      <style:text-properties officeooo:rsid="00d38baa"/>
    </style:style>
    <style:style style:name="T39" style:family="text">
      <style:text-properties fo:color="#127622" loext:opacity="100%" officeooo:rsid="00d38baa"/>
    </style:style>
    <style:style style:name="T40" style:family="text">
      <style:text-properties fo:color="#127622" loext:opacity="100%" officeooo:rsid="00ada9d6"/>
    </style:style>
    <style:style style:name="T41" style:family="text">
      <style:text-properties fo:color="#127622" loext:opacity="100%" officeooo:rsid="00aebfff"/>
    </style:style>
    <style:style style:name="T42" style:family="text">
      <style:text-properties officeooo:rsid="00ada9d6"/>
    </style:style>
    <style:style style:name="T43" style:family="text">
      <style:text-properties officeooo:rsid="0051c53c"/>
    </style:style>
    <style:style style:name="T44" style:family="text">
      <style:text-properties fo:color="#127622" loext:opacity="100%" officeooo:rsid="00d75c88"/>
    </style:style>
    <style:style style:name="T45" style:family="text">
      <style:text-properties officeooo:rsid="00978570"/>
    </style:style>
    <style:style style:name="T46" style:family="text">
      <style:text-properties officeooo:rsid="00d8b5c9"/>
    </style:style>
    <style:style style:name="T47" style:family="text">
      <style:text-properties officeooo:rsid="009edc1a"/>
    </style:style>
    <style:style style:name="T48" style:family="text">
      <style:text-properties officeooo:rsid="00b8e16e"/>
    </style:style>
    <style:style style:name="T49" style:family="text">
      <style:text-properties officeooo:rsid="00b8c94c"/>
    </style:style>
    <style:style style:name="T50" style:family="text">
      <style:text-properties officeooo:rsid="00b9012d"/>
    </style:style>
    <style:style style:name="T51" style:family="text">
      <style:text-properties officeooo:rsid="00a277a9"/>
    </style:style>
    <style:style style:name="T52" style:family="text">
      <style:text-properties officeooo:rsid="00a09418"/>
    </style:style>
    <style:style style:name="T53" style:family="text">
      <style:text-properties fo:color="#127622" loext:opacity="100%" officeooo:rsid="00a09418"/>
    </style:style>
    <style:style style:name="T54" style:family="text">
      <style:text-properties officeooo:rsid="00b52503"/>
    </style:style>
    <style:style style:name="T55" style:family="text">
      <style:text-properties officeooo:rsid="00b6dd63"/>
    </style:style>
    <style:style style:name="T56" style:family="text">
      <style:text-properties officeooo:rsid="00af6460"/>
    </style:style>
    <style:style style:name="T57" style:family="text">
      <style:text-properties fo:color="#127622" loext:opacity="100%" officeooo:rsid="00ba3fc2"/>
    </style:style>
    <style:style style:name="T58" style:family="text">
      <style:text-properties officeooo:rsid="00ba3fc2"/>
    </style:style>
    <style:style style:name="T59" style:family="text">
      <style:text-properties officeooo:rsid="00ba5ed8"/>
    </style:style>
    <style:style style:name="T60" style:family="text">
      <style:text-properties officeooo:rsid="00baa152"/>
    </style:style>
    <style:style style:name="T61" style:family="text">
      <style:text-properties officeooo:rsid="00902992"/>
    </style:style>
    <style:style style:name="T62" style:family="text">
      <style:text-properties officeooo:rsid="00bbbf36"/>
    </style:style>
    <style:style style:name="T63" style:family="text">
      <style:text-properties officeooo:rsid="00b109fa"/>
    </style:style>
    <style:style style:name="T64" style:family="text">
      <style:text-properties officeooo:rsid="00b1b21e"/>
    </style:style>
    <style:style style:name="T65" style:family="text">
      <style:text-properties officeooo:rsid="00d94367"/>
    </style:style>
    <style:style style:name="T66" style:family="text">
      <style:text-properties fo:color="#127622" loext:opacity="100%" officeooo:rsid="00d94367"/>
    </style:style>
    <style:style style:name="T67" style:family="text">
      <style:text-properties officeooo:rsid="00482ea5"/>
    </style:style>
    <style:style style:name="T68" style:family="text">
      <style:text-properties officeooo:rsid="002dacd1"/>
    </style:style>
    <style:style style:name="T69" style:family="text">
      <style:text-properties fo:font-weight="bold" officeooo:rsid="002dacd1" style:font-weight-asian="bold" style:font-weight-complex="bold"/>
    </style:style>
    <style:style style:name="T70" style:family="text">
      <style:text-properties fo:font-weight="bold" officeooo:rsid="00482ea5" style:font-weight-asian="bold" style:font-weight-complex="bold"/>
    </style:style>
    <style:style style:name="T71" style:family="text">
      <style:text-properties officeooo:rsid="00370f77"/>
    </style:style>
    <style:style style:name="T72" style:family="text">
      <style:text-properties style:text-underline-style="solid" style:text-underline-width="auto" style:text-underline-color="font-color" officeooo:rsid="002dacd1"/>
    </style:style>
    <style:style style:name="T73" style:family="text">
      <style:text-properties officeooo:rsid="00355c02"/>
    </style:style>
    <style:style style:name="T74" style:family="text">
      <style:text-properties officeooo:rsid="00da3719"/>
    </style:style>
    <style:style style:name="T75" style:family="text">
      <style:text-properties officeooo:rsid="009b9e2b"/>
    </style:style>
    <style:style style:name="T76" style:family="text">
      <style:text-properties officeooo:rsid="0031bd11"/>
    </style:style>
    <style:style style:name="T77" style:family="text">
      <style:text-properties style:text-underline-style="solid" style:text-underline-width="auto" style:text-underline-color="font-color" officeooo:rsid="0031bd11"/>
    </style:style>
    <style:style style:name="T78" style:family="text">
      <style:text-properties fo:color="#127622" loext:opacity="100%" officeooo:rsid="0031bd11"/>
    </style:style>
    <style:style style:name="T79" style:family="text">
      <style:text-properties officeooo:rsid="003ab87a"/>
    </style:style>
    <style:style style:name="T80" style:family="text">
      <style:text-properties officeooo:rsid="00dd3316"/>
    </style:style>
    <style:style style:name="T81" style:family="text">
      <style:text-properties officeooo:rsid="00de694a"/>
    </style:style>
    <style:style style:name="T82" style:family="text">
      <style:text-properties officeooo:rsid="00df2179"/>
    </style:style>
    <style:style style:name="T83" style:family="text">
      <style:text-properties officeooo:rsid="00dfd311"/>
    </style:style>
    <style:style style:name="T84" style:family="text">
      <style:text-properties officeooo:rsid="00bbf329"/>
    </style:style>
    <style:style style:name="T85" style:family="text">
      <style:text-properties fo:color="#127622" loext:opacity="100%" officeooo:rsid="00bbf329"/>
    </style:style>
    <style:style style:name="T86" style:family="text">
      <style:text-properties officeooo:rsid="00dffcea"/>
    </style:style>
    <style:style style:name="T87" style:family="text">
      <style:text-properties fo:font-style="italic" officeooo:rsid="00dffcea" style:font-style-asian="italic" style:font-style-complex="italic"/>
    </style:style>
    <style:style style:name="T88" style:family="text">
      <style:text-properties fo:font-style="normal" officeooo:rsid="00dffcea" style:font-style-asian="normal" style:font-style-complex="normal"/>
    </style:style>
    <style:style style:name="T89" style:family="text">
      <style:text-properties fo:font-style="normal" officeooo:rsid="00e1ef71" style:font-style-asian="normal" style:font-style-complex="normal"/>
    </style:style>
    <style:style style:name="T90" style:family="text">
      <style:text-properties fo:font-style="normal" officeooo:rsid="00e20259" style:font-style-asian="normal" style:font-style-complex="normal"/>
    </style:style>
    <style:style style:name="T91" style:family="text">
      <style:text-properties officeooo:rsid="00c34b50"/>
    </style:style>
    <style:style style:name="T92" style:family="text">
      <style:text-properties officeooo:rsid="0049fe84"/>
    </style:style>
    <style:style style:name="T93" style:family="text">
      <style:text-properties officeooo:rsid="00570367"/>
    </style:style>
    <style:style style:name="T94" style:family="text">
      <style:text-properties officeooo:rsid="0053f250"/>
    </style:style>
    <style:style style:name="T95" style:family="text">
      <style:text-properties officeooo:rsid="009c9adf"/>
    </style:style>
    <style:style style:name="T96" style:family="text">
      <style:text-properties officeooo:rsid="0055758d"/>
    </style:style>
    <style:style style:name="T97" style:family="text">
      <style:text-properties officeooo:rsid="005702a7"/>
    </style:style>
    <style:style style:name="T98" style:family="text">
      <style:text-properties officeooo:rsid="00593f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tudy goes <text:span text:style-name="T1">far</text:span> beyond just wedding vows but I’m pointing them out specifically because <text:span text:style-name="T2">they are</text:span> a <text:span text:style-name="T3">simple</text:span> <text:span text:style-name="T4">example of how </text:span><text:span text:style-name="T5">Egypt (as a picture of the world)</text:span><text:span text:style-name="T4"> </text:span><text:span text:style-name="T5">has </text:span><text:span text:style-name="T4">crept</text:span> into the church of the living God <text:span text:style-name="T6">while</text:span><text:span text:style-name="T4"> His stewards sleep </text:span><text:span text:style-name="T6">(</text:span><text:span text:style-name="T7">Romans 13:11</text:span><text:span text:style-name="T6">)</text:span><text:span text:style-name="T4">. </text:span><text:span text:style-name="T8">Copying the rudiments </text:span><text:span text:style-name="T9">(fundamentals or</text:span><text:span text:style-name="T8"> traditions</text:span><text:span text:style-name="T9">)</text:span><text:span text:style-name="T8"> of the world without first comparing them to God’s word is often a recipe for sin (</text:span><text:span text:style-name="T10">Col 2:8</text:span><text:span text:style-name="T11">, </text:span><text:span text:style-name="T12">Acts 17:11, </text:span><text:span text:style-name="T13">1Thess 5:21</text:span><text:span text:style-name="T8">). </text:span><text:span text:style-name="T14">It’s also part of the error of Balaam (</text:span><text:span text:style-name="T15">Jude 1:11</text:span><text:span text:style-name="T14">), that is to say, mixing godliness with worldliness.</text:span></text:p>
      <text:p text:style-name="P2">Lord have mercy on us.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6">Numbers 30:</text:span><text:span text:style-name="T17">1-3</text:span><text:line-break/>​<text:span text:style-name="T18">1</text:span> And Moses spake unto the heads of the tribes concerning the children of Israel, saying, This is the thing which the LORD hath commanded. <text:span text:style-name="T18">2</text:span> <text:span text:style-name="T19">If a man </text:span><text:span text:style-name="T20">vow</text:span><text:span text:style-name="T19"> a vow unto the LORD, or </text:span><text:span text:style-name="T20">swear</text:span><text:span text:style-name="T19"> an </text:span><text:span text:style-name="T20">oath</text:span><text:span text:style-name="T19"> to bind his soul with a bond; </text:span><text:span text:style-name="T20">he shall not break his word</text:span><text:span text:style-name="T19">, he shall do according to all that proceedeth out of his mouth.</text:span> <text:span text:style-name="T18">3</text:span> If a woman also <text:span text:style-name="T20">vow a vow</text:span> unto the LORD, and <text:span text:style-name="T20">bind herself by a bond</text:span>, being in her father's house in her youth;</text:p>
          </table:table-cell>
        </table:table-row>
      </table:table>
      <text:list text:style-name="L1">
        <text:list-item>
          <text:p text:style-name="P3">A vow is the same as swearing <text:span text:style-name="T21">which is the same as an oath.</text:span></text:p>
          <text:list>
            <text:list-item>
              <text:p text:style-name="P4">Which is the same as breaking one’s word.</text:p>
            </text:list-item>
          </text:list>
        </text:list-item>
        <text:list-item>
          <text:p text:style-name="P5">Notice that the first part of verse 2 is <text:span text:style-name="T22">between man and</text:span> God and the second part of verse 2 is <text:span text:style-name="T22">between </text:span>anyone <text:span text:style-name="T22">and anyone </text:span><text:span text:style-name="T23">(split at the word “or”).</text:span></text:p>
        </text:list-item>
      </text:list>
      <text:p text:style-name="P6"/>
      <text:p text:style-name="P7"><text:span text:style-name="T24">Side note: what is a soul? Its the flesh and the spirit </text:span><text:span text:style-name="T25">together</text:span><text:span text:style-name="T24">: </text:span><text:span text:style-name="T26">Genesis 2:7</text:span>. <text:span text:style-name="T24">For example, when </text:span><text:span text:style-name="T25">most</text:span><text:span text:style-name="T24"> people say “body” they are only referring to the flesh. Hence, the phrase “the body and the spirit” is </text:span><text:span text:style-name="T27">necessary because the body without the spirit </text:span><text:span text:style-name="T28">(breath of life) </text:span><text:span text:style-name="T27"><text:s/>is dead (</text:span><text:span text:style-name="T29">James 2:26</text:span><text:span text:style-name="T27">).</text:span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6">Deuteronomy 23:21-23</text:span><text:line-break/><text:span text:style-name="T18">21</text:span> <text:span text:style-name="T19">When thou shalt vow a vow unto the LORD thy God, thou shalt not slack to pay it: for the LORD thy God will surely require it of thee; and it would be sin in thee.</text:span> <text:span text:style-name="T18">22</text:span> <text:span text:style-name="T19">But if thou shalt forbear to vow, it shall be no sin in thee.</text:span> <text:span text:style-name="T18">23</text:span> That which is gone out of thy lips thou shalt keep and perform; even a freewill offering, according as thou hast <text:span text:style-name="T20">vowed</text:span> unto the LORD thy God, which thou hast <text:span text:style-name="T20">promised</text:span> with thy mouth.</text:p>
          </table:table-cell>
        </table:table-row>
      </table:table>
      <text:list text:style-name="L2">
        <text:list-item>
          <text:p text:style-name="P8">Making a vow unto the LORD and not fulfilling it is sin.</text:p>
        </text:list-item>
        <text:list-item>
          <text:p text:style-name="P9">The vow must be performed exactly how it was spoken (including how and when).</text:p>
        </text:list-item>
        <text:list-item>
          <text:p text:style-name="P10">A <text:span text:style-name="T30">verbal </text:span>vow is the same as a <text:span text:style-name="T30">verbal </text:span>promise.</text:p>
        </text:list-item>
      </text:list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16">Ecclesiastes 5:4-6</text:span><text:line-break/><text:span text:style-name="T31">4</text:span><text:span text:style-name="T18"> </text:span>When thou vowest a vow unto God, defer not to pay it; for he hath no pleasure in fools: pay that which thou hast vowed. <text:span text:style-name="T18">5</text:span> <text:span text:style-name="T19">Better is it that thou shouldest not vow, than that thou shouldest vow and not pay.</text:span> <text:span text:style-name="T18">6</text:span> Suffer not thy mouth to cause thy flesh to sin; neither say thou before the angel, that it was an error: wherefore should God be angry at thy voice, and destroy the work of thine hands?</text:p>
          </table:table-cell>
        </table:table-row>
      </table:table>
      <text:list text:style-name="L3">
        <text:list-item>
          <text:p text:style-name="P12">A man that vows something to God and does not perform it is a fool.</text:p>
        </text:list-item>
        <text:list-item>
          <text:p text:style-name="P13">It’s better to not vow at all than to vow and not perform it.</text:p>
        </text:list-item>
      </text:list>
      <text:p text:style-name="P14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6">Leviticus 5:4</text:span><text:line-break/><text:span text:style-name="T18">4</text:span> Or if a soul <text:span text:style-name="T20">swear</text:span>, <text:span text:style-name="T19">pronouncing with his lips</text:span> to do evil, or to do good, whatsoever it be that a man shall <text:span text:style-name="T19">pronounce</text:span> with an <text:span text:style-name="T20">oath</text:span>, and it be hid from him; when he knoweth of it, then he shall be guilty in one of these.</text:p>
          </table:table-cell>
        </table:table-row>
      </table:table>
      <text:list text:style-name="L4">
        <text:list-item>
          <text:p text:style-name="P15">To swear is the same as an oath.</text:p>
        </text:list-item>
      </text:list>
      <text:p text:style-name="P1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span text:style-name="T16">Deuteronomy 29:12</text:span><text:line-break/>That thou shouldest enter <text:span text:style-name="T19">into covenant</text:span> with the LORD thy God, and <text:span text:style-name="T19">into his oath</text:span>, which the LORD thy God maketh with thee this day:</text:p>
          </table:table-cell>
        </table:table-row>
      </table:table>
      <text:list text:style-name="L5">
        <text:list-item>
          <text:p text:style-name="P16">To make a covenant is to make an oath.</text:p>
        </text:list-item>
      </text:list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17"><text:span text:style-name="T16">Matthew 5:33-37</text:span><text:line-break/><text:span text:style-name="T18">33</text:span> <text:span text:style-name="T32">Again, ye have heard that it hath been said by them of old time, Thou shalt not forswear thyself, but shalt perform unto the Lord thine </text:span><text:span text:style-name="T33">oaths</text:span><text:span text:style-name="T32">:</text:span></text:p>
            <text:p text:style-name="P17"><text:span text:style-name="T18">34</text:span> <text:span text:style-name="T34">But I say unto you, </text:span><text:span text:style-name="T33">Swear</text:span><text:span text:style-name="T34"> not at all</text:span><text:span text:style-name="T32">; neither by heaven; for it is God's throne:</text:span></text:p>
            <text:p text:style-name="P17"><text:span text:style-name="T18">35</text:span> <text:span text:style-name="T32">Nor by the earth; for it is his footstool: neither by Jerusalem; for it is the city of the great King.</text:span></text:p>
            <text:p text:style-name="P17"><text:span text:style-name="T18">36</text:span> <text:span text:style-name="T32">Neither shalt thou swear by thy head, because thou canst not make one hair white or black.</text:span></text:p>
            <text:p text:style-name="P17"><text:span text:style-name="T18">37</text:span> <text:span text:style-name="T32">But let your communication be, Yea, yea; Nay, nay: for whatsoever is more than these cometh of evil.</text:span></text:p>
            <text:p text:style-name="P18"/>
            <text:p text:style-name="P19">James 5:12</text:p>
            <text:p text:style-name="P20">But above all things, my brethren, swear not, neither by heaven, neither by the earth, neither by any other oath: but let your yea be yea; and your nay, nay; lest ye fall into condemnation.</text:p>
          </table:table-cell>
        </table:table-row>
      </table:table>
      <text:list text:style-name="L6">
        <text:list-item>
          <text:p text:style-name="P21">To “forswear thyself” is to commit perjury against yourself.</text:p>
          <text:list>
            <text:list-item>
              <text:p text:style-name="P21">Perjury is to swear falsely.</text:p>
              <text:list>
                <text:list-item>
                  <text:p text:style-name="P22">Swearing falsely is the same as bearing false witness<text:tab/> <text:span text:style-name="T35">(</text:span><text:span text:style-name="T36">Exo 20:16</text:span><text:span text:style-name="T35">, </text:span><text:span text:style-name="T36">Pro 6:16-19</text:span><text:span text:style-name="T35">).</text:span></text:p>
                  <text:list>
                    <text:list-item>
                      <text:p text:style-name="P21"><text:span text:style-name="T37">W</text:span><text:span text:style-name="T38">hich is the same as lying (</text:span><text:span text:style-name="T39">Rev 21:16</text:span><text:span text:style-name="T38">, </text:span><text:span text:style-name="T39">21:27</text:span><text:span text:style-name="T38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Jesus goes right to the heart of the matter and we are commanded to “<text:span text:style-name="T32">Swear not at all</text:span>”.</text:p>
        </text:list-item>
        <text:list-item>
          <text:p text:style-name="P24">An oath is the same as swearing (<text:span text:style-name="T40">Lev 5:4</text:span><text:span text:style-name="T41">)</text:span><text:span text:style-name="T42">.</text:span></text:p>
        </text:list-item>
        <text:list-item>
          <text:p text:style-name="P25">Anything more than yes or no <text:span text:style-name="T43">comes from evil (and therefore is evil </text:span><text:span text:style-name="T44">Gal 5:9</text:span><text:span text:style-name="T43">).</text:span></text:p>
        </text:list-item>
      </text:list>
      <text:p text:style-name="P26"/>
      <text:p text:style-name="P27"><text:span text:style-name="T45">Let’s put together the </text:span><text:span text:style-name="T46">equivalences</text:span><text:span text:style-name="T45"> </text:span><text:span text:style-name="T47">that </text:span><text:span text:style-name="T45">we’ve gathered from God’s word</text:span>:</text:p>
      <text:p text:style-name="P27"/>
      <text:list text:style-name="L7">
        <text:list-item>
          <text:p text:style-name="P28"><text:span text:style-name="T48">The “</text:span><text:span text:style-name="T49">umbrella” </text:span><text:span text:style-name="T50">is</text:span><text:span text:style-name="T49"> </text:span><text:span text:style-name="T47">“a binding agreement </text:span><text:span text:style-name="T51">between two parties </text:span><text:span text:style-name="T47">with words” </text:span><text:span text:style-name="T52">(</text:span><text:span text:style-name="T53">Num 30:2c</text:span><text:span text:style-name="T52">)</text:span></text:p>
          <text:list>
            <text:list-item>
              <text:p text:style-name="P28">to swear</text:p>
            </text:list-item>
            <text:list-item>
              <text:p text:style-name="P28">to make an oath</text:p>
            </text:list-item>
            <text:list-item>
              <text:p text:style-name="P28">to make a vow</text:p>
            </text:list-item>
            <text:list-item>
              <text:p text:style-name="P28">to promise</text:p>
            </text:list-item>
            <text:list-item>
              <text:p text:style-name="P28">to make a covenant <text:span text:style-name="T54">(or </text:span><text:span text:style-name="T55">a </text:span><text:span text:style-name="T54">league)</text:span></text:p>
            </text:list-item>
          </text:list>
        </text:list-item>
      </text:list>
      <text:p text:style-name="P29"/>
      <text:p text:style-name="P30">Note that these are not all <text:span text:style-name="T1">exactly</text:span> equal but because of their interconnectedness they <text:span text:style-name="T45">all deal with the same basic matters: guaranteeing something to someone in the future, guaranteeing something will or will not happen in the future, </text:span><text:span text:style-name="T56">or guaranteeing that you will or won’t do something in the future. </text:span><text:span text:style-name="T57">Proverbs 27:1</text:span><text:span text:style-name="T58">, </text:span><text:span text:style-name="T57">Matthew 5:36b</text:span><text:span text:style-name="T58">, and </text:span><text:span text:style-name="T57">James 4:13-16</text:span><text:span text:style-name="T58"> </text:span><text:span text:style-name="T59">all explain to us why doing those things </text:span><text:span text:style-name="T60">are not only</text:span><text:span text:style-name="T59"> foolish </text:span><text:span text:style-name="T60">but also they are</text:span><text:span text:style-name="T59"> sin.</text:span></text:p>
      <text:p text:style-name="P30"/>
      <text:p text:style-name="P31">By looking at all of God’s word we can learn that the swearing Jesus was talking about encompasses <text:span text:style-name="T61">far </text:span>more than <text:span text:style-name="T62">what </text:span><text:span text:style-name="T63">we might initially suspect if we do not </text:span><text:span text:style-name="T64">take a careful look at all of scripture </text:span><text:span text:style-name="T65">like we are commanded to (</text:span><text:span text:style-name="T66">2Ti 2:15</text:span><text:span text:style-name="T65">).</text:span></text:p>
      <text:p text:style-name="P32"/>
      <text:p text:style-name="P33">Jesus makes the points in the old testament crystal clear <text:span text:style-name="T67">by simply</text:span><text:span text:style-name="T68"> </text:span><text:span text:style-name="T69">command</text:span><text:span text:style-name="T70">ing</text:span><text:span text:style-name="T68"> </text:span><text:span text:style-name="T67">us</text:span><text:span text:style-name="T71"> </text:span><text:span text:style-name="T68">to not swear </text:span><text:span text:style-name="T72">at all</text:span><text:span text:style-name="T68"> – </text:span><text:span text:style-name="T73">not to God nor to each other nor to anything or by anything. </text:span><text:span text:style-name="T74">Moreover, He also explains to us why for us it doesn’t make any sense to promise anything in the future.</text:span></text:p>
      <text:p text:style-name="P33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6">Proverbs 27:1</text:span><text:line-break/>Boast not thyself of to morrow; for <text:span text:style-name="T19">thou knowest not what a day may bring forth</text:span>.</text:p>
            <text:p text:style-name="Table_20_Contents"/>
            <text:p text:style-name="P34"><text:span text:style-name="T16">James 4:13-16</text:span><text:line-break/><text:span text:style-name="T18">13</text:span> Go to now, ye that say, To day or to morrow we will go into such a city, and continue there a year, and buy and sell, and get gain: <text:span text:style-name="T18">14</text:span> Whereas <text:span text:style-name="T19">ye know not what shall be on the morrow</text:span>. For what is your life? It is even a vapour, that appeareth for a little time, and then vanisheth away. <text:span text:style-name="T18">15</text:span> For that ye ought to say, If the Lord will, we shall live, and do this, or that. <text:span text:style-name="T18">16</text:span> But now ye rejoice in your boastings: <text:span text:style-name="T19">all such rejoicing is evil</text:span>.</text:p>
          </table:table-cell>
        </table:table-row>
      </table:table>
      <text:p text:style-name="Standard"><text:soft-page-break/><text:span text:style-name="T75">W</text:span><text:span text:style-name="T76">e can’t guarantee that </text:span><text:span text:style-name="T77">anything</text:span><text:span text:style-name="T76"> will or won’t happen. If we can’t guarantee something will or won’t happen and we can’t make that change happen (</text:span><text:span text:style-name="T78">Mat 5:36b</text:span><text:span text:style-name="T76">) </text:span><text:span text:style-name="T79">how then can</text:span><text:span text:style-name="T76"> we also guarantee that if we make a promise/oath/swear that we aren’t lying? </text:span><text:span text:style-name="T79">We simply can’t. </text:span><text:span text:style-name="T80">So, it’s a fools errand and self-deception at best </text:span><text:span text:style-name="T81">to promise anything</text:span><text:span text:style-name="T80">. </text:span><text:span text:style-name="T82">Hence, keep it simple: </text:span><text:span text:style-name="T83">yes or no (anything more than that is evil)</text:span><text:span text:style-name="T82">. </text:span><text:span text:style-name="T84">Moreover, </text:span><text:span text:style-name="T85">James 4:13-16</text:span> <text:span text:style-name="T86">shows us just how easily we can compound sin on top of sin by then </text:span><text:span text:style-name="T87">boasting</text:span><text:span text:style-name="T88"> about </text:span><text:span text:style-name="T89">something we can’t even </text:span><text:span text:style-name="T90">ensure</text:span><text:span text:style-name="T89"> happen</text:span><text:span text:style-name="T90">s</text:span><text:span text:style-name="T89">.</text:span></text:p>
      <text:p text:style-name="P35"/>
      <text:p text:style-name="P36">Summary:</text:p>
      <text:p text:style-name="P36"/>
      <text:list text:style-name="L8">
        <text:list-item>
          <text:p text:style-name="P37">Do not make any verbal, binding agreement to anyone by anything. Simply say “yes” or “no”. <text:span text:style-name="T91">This includes but is not limited to:</text:span></text:p>
          <text:list>
            <text:list-item>
              <text:p text:style-name="P38"><text:span text:style-name="T92">D</text:span>o not swear <text:span text:style-name="T92">to anyone by anything</text:span></text:p>
            </text:list-item>
            <text:list-item>
              <text:p text:style-name="P38"><text:span text:style-name="T92">D</text:span>o not make oaths <text:span text:style-name="T92">to anyone by anything</text:span></text:p>
            </text:list-item>
            <text:list-item>
              <text:p text:style-name="P38"><text:span text:style-name="T92">D</text:span>o not make vows <text:span text:style-name="T92">to anyone by anything</text:span></text:p>
            </text:list-item>
            <text:list-item>
              <text:p text:style-name="P38"><text:span text:style-name="T92">D</text:span>o not <text:span text:style-name="T92">make/</text:span>give promises <text:span text:style-name="T92">to anyone by anything</text:span></text:p>
            </text:list-item>
            <text:list-item>
              <text:p text:style-name="P39">Do not make a covenant/league with anyone by anything</text:p>
            </text:list-item>
          </text:list>
        </text:list-item>
      </text:list>
      <text:p text:style-name="P40"/>
      <text:p text:style-name="P36"/>
      <text:p text:style-name="P41">Bonus: the world is almost constantly changing <text:span text:style-name="T93">definitions </text:span>and adding vocabulary to masquerade sin as something else. <text:span text:style-name="T94">Some examples related to this context </text:span><text:span text:style-name="T95">(dependent on how they are used)</text:span><text:span text:style-name="T94">: </text:span><text:span text:style-name="T96">guarantee, </text:span><text:span text:style-name="T97">undertaking, </text:span><text:span text:style-name="T93">contract, commitment, </text:span><text:span text:style-name="T98">word of hono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13:58:17.340169900</meta:creation-date>
    <dc:title>Wedding vows</dc:title>
    <meta:editing-duration>PT7H40M59S</meta:editing-duration>
    <meta:editing-cycles>230</meta:editing-cycles>
    <meta:generator>LibreOffice/26.2.4.2$Linux_X86_64 LibreOffice_project/64a984c51f4702dbd3710b13428c673a2f1292e7</meta:generator>
    <dc:date>2026-07-11T12:30:14.763084339</dc:date>
    <meta:document-statistic meta:table-count="7" meta:image-count="0" meta:object-count="0" meta:page-count="3" meta:paragraph-count="53" meta:word-count="1396" meta:character-count="7182" meta:non-whitespace-character-count="5864"/>
    <meta:template xlink:type="simple" xlink:actuate="onRequest" xlink:title="default" xlink:href="../../../../AppData/Roaming/LibreOffice/4/user/template/default.ott" meta:date="2025-09-13T08:39:59.752050200"/>
  </office:meta>
</office:document-meta>
</file>