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fo:break-before="page" table:align="margins"/>
    </style:style>
    <style:style style:name="Table1.A" style:family="table-column">
      <style:table-column-properties style:column-width="3.416in" style:rel-column-width="27301*"/>
    </style:style>
    <style:style style:name="Table1.B" style:family="table-column">
      <style:table-column-properties style:column-width="4.784in" style:rel-column-width="38234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1.B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style:vertical-align="middle" fo:padding="0.0382in" fo:border-left="0.5pt solid #000000" fo:border-right="none" fo:border-top="none" fo:border-bottom="none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fo:break-before="page" table:align="margins"/>
    </style:style>
    <style:style style:name="Table2.A" style:family="table-column">
      <style:table-column-properties style:column-width="7.1in" style:rel-column-width="56743*"/>
    </style:style>
    <style:style style:name="Table2.B" style:family="table-column">
      <style:table-column-properties style:column-width="1.1in" style:rel-column-width="879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127622" loext:opacity="100%" style:font-name="Liberation Sans" fo:font-size="12pt" officeooo:paragraph-rsid="001e22dc" style:font-size-asian="12pt" style:font-size-complex="12pt"/>
    </style:style>
    <style:style style:name="P2" style:family="paragraph" style:parent-style-name="Table_20_Contents">
      <style:text-properties style:font-name="Liberation Sans" fo:font-size="12pt" officeooo:paragraph-rsid="001e22dc" style:font-size-asian="12pt" style:font-size-complex="12pt"/>
    </style:style>
    <style:style style:name="P3" style:family="paragraph" style:parent-style-name="Table_20_Contents">
      <style:text-properties fo:color="#127622" loext:opacity="100%" style:font-name="Liberation Sans" fo:font-size="12pt" officeooo:paragraph-rsid="002e79cc" style:font-size-asian="12pt" style:font-size-complex="12pt"/>
    </style:style>
    <style:style style:name="P4" style:family="paragraph" style:parent-style-name="Table_20_Contents">
      <style:text-properties style:font-name="Liberation Sans" fo:font-size="12pt" officeooo:paragraph-rsid="002e79cc" style:font-size-asian="12pt" style:font-size-complex="12pt"/>
    </style:style>
    <style:style style:name="P5" style:family="paragraph" style:parent-style-name="Table_20_Contents">
      <style:text-properties fo:color="#127622" loext:opacity="100%" style:font-name="Liberation Sans" fo:font-size="12pt" officeooo:paragraph-rsid="0022fe9e" style:font-size-asian="12pt" style:font-size-complex="12pt"/>
    </style:style>
    <style:style style:name="P6" style:family="paragraph" style:parent-style-name="Table_20_Contents">
      <style:text-properties style:font-name="Liberation Sans" fo:font-size="12pt" officeooo:paragraph-rsid="0022fe9e" style:font-size-asian="12pt" style:font-size-complex="12pt"/>
    </style:style>
    <style:style style:name="P7" style:family="paragraph" style:parent-style-name="Table_20_Contents">
      <style:text-properties fo:color="#127622" loext:opacity="100%" style:font-name="Liberation Sans" fo:font-size="12pt" officeooo:paragraph-rsid="006a1ab9" style:font-size-asian="12pt" style:font-size-complex="12pt"/>
    </style:style>
    <style:style style:name="P8" style:family="paragraph" style:parent-style-name="Table_20_Contents">
      <style:text-properties style:font-name="Liberation Sans" fo:font-size="12pt" officeooo:paragraph-rsid="006a1ab9" style:font-size-asian="12pt" style:font-size-complex="12pt"/>
    </style:style>
    <style:style style:name="P9" style:family="paragraph" style:parent-style-name="Table_20_Contents">
      <style:text-properties style:font-name="Liberation Sans" fo:font-size="12pt" officeooo:paragraph-rsid="0026ab8c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paragraph-rsid="0027e750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paragraph-rsid="0029a132" style:font-size-asian="12pt" style:font-size-complex="12pt"/>
    </style:style>
    <style:style style:name="P12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421bde" style:font-size-asian="12pt" style:font-size-complex="12pt"/>
    </style:style>
    <style:style style:name="P13" style:family="paragraph" style:parent-style-name="Table_20_Contents">
      <style:text-properties officeooo:paragraph-rsid="00421bde"/>
    </style:style>
    <style:style style:name="P14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3f9606" style:font-size-asian="12pt" style:font-size-complex="12pt"/>
    </style:style>
    <style:style style:name="P15" style:family="paragraph" style:parent-style-name="Table_20_Contents">
      <style:text-properties style:font-name="Liberation Sans" fo:font-size="12pt" officeooo:paragraph-rsid="003f9606" style:font-size-asian="12pt" style:font-size-complex="12pt"/>
    </style:style>
    <style:style style:name="P16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40b73e" style:font-size-asian="12pt" style:font-size-complex="12pt"/>
    </style:style>
    <style:style style:name="P17" style:family="paragraph" style:parent-style-name="Table_20_Contents">
      <style:text-properties officeooo:paragraph-rsid="0040b73e"/>
    </style:style>
    <style:style style:name="P18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260ab0" style:font-size-asian="12pt" style:font-size-complex="12pt"/>
    </style:style>
    <style:style style:name="P19" style:family="paragraph" style:parent-style-name="Table_20_Contents">
      <style:text-properties style:font-name="Liberation Sans" fo:font-size="12pt" officeooo:paragraph-rsid="00260ab0" style:font-size-asian="12pt" style:font-size-complex="12pt"/>
    </style:style>
    <style:style style:name="P20" style:family="paragraph" style:parent-style-name="Standard">
      <style:paragraph-properties fo:text-align="left" style:justify-single-word="false" fo:break-before="page"/>
      <style:text-properties fo:color="#127622" loext:opacity="100%" fo:font-weight="normal" style:font-weight-asian="normal" style:font-weight-complex="normal"/>
    </style:style>
    <style:style style:name="P21" style:family="paragraph" style:parent-style-name="Standard">
      <style:paragraph-properties fo:text-align="left" style:justify-single-word="false"/>
    </style:style>
    <style:style style:name="P22" style:family="paragraph" style:parent-style-name="Standard">
      <style:paragraph-properties fo:text-align="left" style:justify-single-word="false"/>
      <style:text-properties officeooo:rsid="006c7f3a" officeooo:paragraph-rsid="006c7f3a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4664d3" officeooo:paragraph-rsid="004664d3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842b0" officeooo:paragraph-rsid="004f2cf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8939d" officeooo:paragraph-rsid="0048939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01998" officeooo:paragraph-rsid="0050199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233fb" officeooo:paragraph-rsid="005233fb" style:font-size-asian="12pt" style:font-size-complex="12pt"/>
    </style:style>
    <style:style style:name="P29" style:family="paragraph" style:parent-style-name="Table_20_Contents">
      <style:text-properties style:use-window-font-color="true" loext:opacity="0%" fo:font-size="12pt" officeooo:paragraph-rsid="0058333a" style:font-size-asian="12pt" style:font-size-complex="12pt"/>
    </style:style>
    <style:style style:name="P30" style:family="paragraph" style:parent-style-name="Table_20_Contents">
      <style:text-properties fo:font-size="12pt" officeooo:paragraph-rsid="0058333a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55f30e" officeooo:paragraph-rsid="0055f30e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5f2243" officeooo:paragraph-rsid="005f2243" style:font-size-asian="12pt" style:font-size-complex="12pt"/>
    </style:style>
    <style:style style:name="P33" style:family="paragraph" style:parent-style-name="Table_20_Contents">
      <style:text-properties fo:color="#127622" loext:opacity="100%" fo:font-size="12pt" officeooo:paragraph-rsid="005fdf02" style:font-size-asian="12pt" style:font-size-complex="12pt"/>
    </style:style>
    <style:style style:name="P34" style:family="paragraph" style:parent-style-name="Table_20_Contents">
      <style:text-properties fo:color="#ff0000" loext:opacity="100%" fo:font-size="12pt" officeooo:paragraph-rsid="005fdf02" style:font-size-asian="12pt" style:font-size-complex="12pt"/>
    </style:style>
    <style:style style:name="P35" style:family="paragraph" style:parent-style-name="Table_20_Contents">
      <style:text-properties fo:color="#127622" loext:opacity="100%" fo:font-size="12pt" officeooo:paragraph-rsid="00602538" style:font-size-asian="12pt" style:font-size-complex="12pt"/>
    </style:style>
    <style:style style:name="P36" style:family="paragraph" style:parent-style-name="Table_20_Contents">
      <style:text-properties fo:color="#ff0000" loext:opacity="100%" fo:font-size="12pt" officeooo:paragraph-rsid="00602538" style:font-size-asian="12pt" style:font-size-complex="12pt"/>
    </style:style>
    <style:style style:name="P37" style:family="paragraph" style:parent-style-name="Table_20_Contents">
      <style:text-properties fo:color="#ff0000" loext:opacity="100%" fo:font-size="12pt" officeooo:paragraph-rsid="00616c25" style:font-size-asian="12pt" style:font-size-complex="12pt"/>
    </style:style>
    <style:style style:name="P38" style:family="paragraph" style:parent-style-name="Table_20_Contents">
      <style:text-properties fo:color="#127622" loext:opacity="100%" fo:font-size="12pt" officeooo:paragraph-rsid="00616c25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5fdf02" officeooo:paragraph-rsid="005fdf02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623542" officeooo:paragraph-rsid="00623542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67e0c5" officeooo:paragraph-rsid="0067e0c5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style:font-size-asian="12pt" style:font-size-complex="12pt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dee6ef" loext:char-shading-value="0"/>
    </style:style>
    <style:style style:name="T3" style:family="text">
      <style:text-properties style:text-position="super 58%" officeooo:rsid="00318cb3" fo:background-color="transparent" loext:char-shading-value="0"/>
    </style:style>
    <style:style style:name="T4" style:family="text">
      <style:text-properties style:text-position="super 58%" officeooo:rsid="00333d45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position="super 58%" officeooo:rsid="00248bf6" fo:background-color="transparent" loext:char-shading-value="0"/>
    </style:style>
    <style:style style:name="T7" style:family="text">
      <style:text-properties style:text-position="super 58%" officeooo:rsid="0026ab8c"/>
    </style:style>
    <style:style style:name="T8" style:family="text">
      <style:text-properties style:text-position="super 58%" officeooo:rsid="0027e4de" fo:background-color="transparent" loext:char-shading-value="0"/>
    </style:style>
    <style:style style:name="T9" style:family="text">
      <style:text-properties fo:font-variant="normal" fo:text-transform="none" fo:color="#127630" loext:opacity="100%" fo:font-style="normal" fo:font-weight="normal"/>
    </style:style>
    <style:style style:name="T10" style:family="text">
      <style:text-properties fo:font-variant="normal" fo:text-transform="none" fo:color="#127630" loext:opacity="100%" fo:font-style="normal" fo:font-weight="normal" officeooo:rsid="002abdff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3d9f19"/>
    </style:style>
    <style:style style:name="T13" style:family="text">
      <style:text-properties style:text-position="super 58%" officeooo:rsid="00309c46" fo:background-color="transparent" loext:char-shading-value="0"/>
    </style:style>
    <style:style style:name="T14" style:family="text">
      <style:text-properties style:text-position="super 58%" officeooo:rsid="00309c46"/>
    </style:style>
    <style:style style:name="T15" style:family="text">
      <style:text-properties style:font-name="Liberation Sans" fo:font-size="12pt" style:font-size-asian="12pt" style:font-size-complex="12pt"/>
    </style:style>
    <style:style style:name="T16" style:family="text">
      <style:text-properties style:text-position="super 58%" officeooo:rsid="003f4349"/>
    </style:style>
    <style:style style:name="T17" style:family="text">
      <style:text-properties style:text-position="super 58%" officeooo:rsid="003f9606"/>
    </style:style>
    <style:style style:name="T18" style:family="text">
      <style:text-properties fo:color="#127622" loext:opacity="100%"/>
    </style:style>
    <style:style style:name="T19" style:family="text">
      <style:text-properties style:text-position="33% 80%"/>
    </style:style>
    <style:style style:name="T20" style:family="text">
      <style:text-properties fo:font-style="italic"/>
    </style:style>
    <style:style style:name="T21" style:family="text">
      <style:text-properties style:text-position="super 58%" officeooo:rsid="0025c13a"/>
    </style:style>
    <style:style style:name="T22" style:family="text">
      <style:text-properties officeooo:rsid="0071b724"/>
    </style:style>
    <style:style style:name="T23" style:family="text">
      <style:text-properties officeooo:rsid="0053116d"/>
    </style:style>
    <style:style style:name="T24" style:family="text">
      <style:text-properties fo:font-weight="normal" officeooo:rsid="0053116d" style:font-weight-asian="normal" style:font-weight-complex="normal"/>
    </style:style>
    <style:style style:name="T25" style:family="text">
      <style:text-properties fo:font-weight="normal" officeooo:rsid="0053b725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loext:opacity="100%"/>
    </style:style>
    <style:style style:name="T28" style:family="text">
      <style:text-properties officeooo:rsid="004f2cf6"/>
    </style:style>
    <style:style style:name="T29" style:family="text">
      <style:text-properties fo:color="#127622" loext:opacity="100%" officeooo:rsid="004f2cf6"/>
    </style:style>
    <style:style style:name="T30" style:family="text">
      <style:text-properties style:use-window-font-color="true" loext:opacity="0%"/>
    </style:style>
    <style:style style:name="T31" style:family="text">
      <style:text-properties style:use-window-font-color="true" loext:opacity="0%" officeooo:rsid="004c322b"/>
    </style:style>
    <style:style style:name="T32" style:family="text">
      <style:text-properties fo:color="#127622" loext:opacity="100%" officeooo:rsid="004c322b"/>
    </style:style>
    <style:style style:name="T33" style:family="text">
      <style:text-properties officeooo:rsid="0055f30e"/>
    </style:style>
    <style:style style:name="T34" style:family="text">
      <style:text-properties officeooo:rsid="005a51b4"/>
    </style:style>
    <style:style style:name="T35" style:family="text">
      <style:text-properties officeooo:rsid="0059f491"/>
    </style:style>
    <style:style style:name="T36" style:family="text">
      <style:text-properties officeooo:rsid="0062f7ad"/>
    </style:style>
    <style:style style:name="T37" style:family="text">
      <style:text-properties fo:color="#ff0000" loext:opacity="100%" fo:background-color="#ffff00" loext:char-shading-value="0"/>
    </style:style>
    <style:style style:name="T38" style:family="text">
      <style:text-properties fo:color="#127622" loext:opacity="100%" officeooo:rsid="0057f5d6"/>
    </style:style>
    <style:style style:name="T39" style:family="text">
      <style:text-properties fo:background-color="#ffff00" loext:char-shading-value="0"/>
    </style:style>
    <style:style style:name="T40" style:family="text">
      <style:text-properties fo:color="#ff0000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Job 22:29</text:p>
            <text:p text:style-name="P2">When men are cast down, then thou shalt say, <text:span text:style-name="T1">There is lifting up</text:span>; and <text:span text:style-name="T2">he shall save the humble person</text:span>.</text:p>
          </table:table-cell>
          <table:table-cell table:style-name="Table1.B1" office:value-type="string">
            <text:p text:style-name="P3">Ezekiel 21:26</text:p>
            <text:p text:style-name="P4">Thus saith the Lord GOD; Remove the diadem, and take off the crown: this shall not be the same: <text:span text:style-name="T1">exalt him that is low</text:span><text:span text:style-name="T3">H8217</text:span>, and <text:span text:style-name="T2">abase him that is high</text:span><text:span text:style-name="T4">H1364</text:span>.</text:p>
          </table:table-cell>
        </table:table-row>
        <table:table-row>
          <table:table-cell table:style-name="Table1.A2" office:value-type="string">
            <text:p text:style-name="P5">Proverbs 3:34</text:p>
            <text:p text:style-name="P6">Surely he scorneth the scorners<text:span text:style-name="T5">: but he giveth grace unto the </text:span><text:span text:style-name="T1">lowly</text:span><text:span text:style-name="T6">H6035</text:span><text:span text:style-name="T5">.</text:span></text:p>
          </table:table-cell>
          <table:table-cell table:style-name="Table1.B2" office:value-type="string">
            <text:p text:style-name="P5">Numbers 12:3</text:p>
            <text:p text:style-name="P6">(Now the man Moses was very <text:span text:style-name="T1">meek</text:span><text:span text:style-name="T6">H6035</text:span>, above all the men which were upon the face of the earth.)</text:p>
            <text:p text:style-name="P6"/>
            <text:p text:style-name="P7">James 4:6</text:p>
            <text:p text:style-name="P8">But he giveth more grace. Wherefore he saith, God resisteth the proud, but giveth grace unto the humble.</text:p>
          </table:table-cell>
        </table:table-row>
        <table:table-row>
          <table:table-cell table:style-name="Table1.A3" table:number-rows-spanned="2" office:value-type="string">
            <text:p text:style-name="P5">Proverbs 29:23</text:p>
            <text:p text:style-name="P6">A man's <text:span text:style-name="T2">pride</text:span><text:span text:style-name="T7">H1346</text:span> shall bring him low: but honour shall uphold the <text:span text:style-name="T1">humble</text:span><text:span text:style-name="T8">H8217</text:span> in spirit.</text:p>
          </table:table-cell>
          <table:table-cell table:style-name="Table1.B3" office:value-type="string">
            <text:p text:style-name="P9"><text:span text:style-name="T9">Isa</text:span><text:span text:style-name="T10">iah</text:span><text:span text:style-name="T9"> 13:11</text:span></text:p>
            <text:p text:style-name="P9">And I will punish the world for their evil, and the wicked for their iniquity; and I will cause the arrogancy of the proud to cease, and will lay low <text:span text:style-name="T2">the haughtiness</text:span><text:span text:style-name="T11">H1346</text:span> of the terrible.</text:p>
            <text:p text:style-name="P9"><text:line-break/><text:span text:style-name="T9">Jer</text:span><text:span text:style-name="T10">emiah</text:span><text:span text:style-name="T9"> 48:29</text:span></text:p>
            <text:p text:style-name="P9">We have heard the pride of Moab, (he is exceeding proud) his loftiness<text:span text:style-name="T2">, and his arrogancy</text:span><text:span text:style-name="T11">H1346</text:span>, and his pride, and the haughtiness of his heart.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10"><text:span text:style-name="T9">2 Sa</text:span><text:span text:style-name="T10">muel</text:span><text:span text:style-name="T9"> 6:22</text:span></text:p>
            <text:p text:style-name="P10">And I will yet be more vile than thus<text:span text:style-name="T1">, and will be base</text:span><text:span text:style-name="T11">H8217</text:span> in mine own sight: and of the maidservants which thou hast spoken of, of them shall I be had in honour.</text:p>
            <text:p text:style-name="P10"/>
            <text:p text:style-name="P11"><text:span text:style-name="T9">Psa</text:span><text:span text:style-name="T10">lm</text:span><text:span text:style-name="T9"> 138:6</text:span></text:p>
            <text:p text:style-name="P11">Though the LORD be high, yet hath he respect <text:span text:style-name="T1">unto the lowly</text:span><text:span text:style-name="T11">H8217</text:span>: <text:span text:style-name="T2">but the proud</text:span><text:span text:style-name="T12">H1364</text:span> he knoweth afar off.</text:p>
          </table:table-cell>
        </table:table-row>
        <table:table-row>
          <table:table-cell table:style-name="Table1.A3" office:value-type="string">
            <text:p text:style-name="P5">Isaiah 57:15</text:p>
            <text:p text:style-name="P6">For thus saith the high and lofty One that inhabiteth eternity, whose name is Holy; I dwell in the high and holy place, with him also that is of a contrite <text:span text:style-name="T1">and humble</text:span><text:span text:style-name="T13">H8217</text:span> spirit, to revive the spirit <text:span text:style-name="T1">of the humble</text:span><text:span text:style-name="T14">H8217</text:span>, and to revive the heart of the contrite ones.</text:p>
          </table:table-cell>
          <table:table-cell table:style-name="Table1.B3" office:value-type="string">
            <text:p text:style-name="P12">Lev 13:20</text:p>
            <text:p text:style-name="P13"><text:span text:style-name="T15">And if, when the priest seeth it, behold, it be in sight </text:span><text:span text:style-name="T1">lower</text:span><text:span text:style-name="T11">H8217</text:span><text:span text:style-name="T15"> than the skin, and the hair thereof be turned white; the priest shall pronounce him unclean: it is a plague of leprosy broken out of the boil.</text:span></text:p>
          </table:table-cell>
        </table:table-row>
        <table:table-row>
          <table:table-cell table:style-name="Table1.A3" office:value-type="string">
            <text:p text:style-name="P5">Isaiah 66:2</text:p>
            <text:p text:style-name="P6">For all those things hath mine hand made, and all those things have been, saith the LORD: but to this man will I look<text:span text:style-name="T1">, even to him that is poor</text:span><text:span text:style-name="T16">H6041</text:span> and of a contrite spirit, and trembleth at my word.</text:p>
          </table:table-cell>
          <table:table-cell table:style-name="Table1.B3" office:value-type="string">
            <text:p text:style-name="P14">Psa 9:12</text:p>
            <text:p text:style-name="P15">When he maketh inquisition for blood, he remembereth them: he forgetteth not the cry <text:span text:style-name="T1">of the humble</text:span><text:span text:style-name="T11">H60</text:span><text:span text:style-name="T17">41</text:span>.</text:p>
            <text:p text:style-name="P15"/>
            <text:p text:style-name="P16">2Sa 22:28</text:p>
            <text:p text:style-name="P17"><text:span text:style-name="T1">And the afflicted</text:span><text:span text:style-name="T11">H6041</text:span><text:span text:style-name="T15"> people thou wilt save: but thine eyes are upon the haughty, that thou mayest bring them down.</text:span></text:p>
          </table:table-cell>
        </table:table-row>
        <table:table-row>
          <table:table-cell table:style-name="Table1.A3" office:value-type="string">
            <text:p text:style-name="P6"><text:span text:style-name="T18">Proverbs 6:16-17</text:span><text:line-break/><text:span text:style-name="T19">16</text:span> These six <text:span text:style-name="T20">things</text:span> doth the LORD hate: yea, seven <text:span text:style-name="T20">are</text:span> an abomination unto him: <text:line-break/><text:span text:style-name="T19">17</text:span> A <text:span text:style-name="T1">proud</text:span><text:span text:style-name="T21">H7311</text:span> look, a lying tongue, and hands that shed innocent blood,</text:p>
          </table:table-cell>
          <table:table-cell table:style-name="Table1.B3" office:value-type="string">
            <text:p text:style-name="P18">Num 15:30</text:p>
            <text:p text:style-name="P19">But the soul that doeth <text:span text:style-name="T1">ought presumptuously</text:span><text:span text:style-name="T11">H7311</text:span>, whether he be born in the land, or a stranger, the same reproacheth the LORD; and that soul shall be cut off from among his people.</text:p>
          </table:table-cell>
        </table:table-row>
      </table:table>
      <text:p text:style-name="P20">Psalm 19:7</text:p>
      <text:p text:style-name="P21">The law of the LORD is perfect, converting the soul: the testimony of the LORD is sure, making wise the simple.</text:p>
      <text:p text:style-name="P21"/>
      <text:p text:style-name="P22"><text:span text:style-name="T18">James 4:6c,6d</text:span> (<text:span text:style-name="T18">1 Peter 5:5g, 5h</text:span>)</text:p>
      <text:p text:style-name="P22">...God resisteth the proud, but/<text:span text:style-name="T22">and</text:span> giveth grace unto the hum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<text:span text:style-name="T23">Statement</text:span><text:span text:style-name="T24"> </text:span><text:span text:style-name="T25">(to Jesus)</text:span> → Response<text:span text:style-name="T26"> </text:span><text:span text:style-name="T25">(from Jesus)</text:span></text:p>
          </table:table-cell>
          <table:table-cell table:style-name="Table2.B1" office:value-type="string">
            <text:p text:style-name="P23">Law/Grace</text:p>
          </table:table-cell>
        </table:table-row>
        <table:table-row>
          <table:table-cell table:style-name="Table2.A2" office:value-type="string">
            <text:p text:style-name="P24"><text:span text:style-name="T18">Matthew 4:3-4</text:span><text:line-break/><text:span text:style-name="T19">3</text:span> And when the tempter came to him, he said, If thou be the Son of God, command that these stones be made bread. <text:line-break/><text:span text:style-name="T19">4</text:span> But he answered and said, <text:span text:style-name="T27">It is written, Man shall not live by bread alone, but by every word that proceedeth out of the mouth of God.</text:span></text:p>
          </table:table-cell>
          <table:table-cell table:style-name="Table2.B2" office:value-type="string">
            <text:p text:style-name="P25">Law</text:p>
            <text:p text:style-name="P25"><text:span text:style-name="T28">(</text:span><text:span text:style-name="T29">Deu 8:3</text:span><text:span text:style-name="T28">)</text:span></text:p>
          </table:table-cell>
        </table:table-row>
        <table:table-row>
          <table:table-cell table:style-name="Table2.A2" office:value-type="string">
            <text:p text:style-name="P24"><text:span text:style-name="T18">Matthew 4:5-7</text:span><text:span text:style-name="T30"> </text:span><text:span text:style-name="T31">(</text:span><text:span text:style-name="T32">Psalm 91:11-12</text:span><text:span text:style-name="T31">)</text:span><text:line-break/><text:span text:style-name="T19">5</text:span> Then the devil taketh him up into the holy city, and setteth him on a pinnacle of the temple, <text:line-break/><text:span text:style-name="T19">6</text:span> And saith unto him, If thou be the Son of God, cast thyself down: for it is written, He shall give his angels charge concerning thee: and in <text:span text:style-name="T20">their</text:span> hands they shall bear thee up, lest at any time thou dash thy foot against a stone. <text:line-break/><text:span text:style-name="T19">7</text:span> Jesus said unto him, <text:span text:style-name="T27">It is written again, Thou shalt not tempt the Lord thy God.</text:span></text:p>
          </table:table-cell>
          <table:table-cell table:style-name="Table2.B2" office:value-type="string">
            <text:p text:style-name="P26">Law</text:p>
            <text:p text:style-name="P27">(<text:span text:style-name="T18">Deu 6:16</text:span>)</text:p>
          </table:table-cell>
        </table:table-row>
        <table:table-row>
          <table:table-cell table:style-name="Table2.A2" office:value-type="string">
            <text:p text:style-name="P24"><text:span text:style-name="T18">Matthew 4:8-10</text:span><text:line-break/><text:span text:style-name="T19">8</text:span> Again, the devil taketh him up into an exceeding high mountain, and sheweth him all the kingdoms of the world, and the glory of them; <text:line-break/><text:span text:style-name="T19">9</text:span> And saith unto him, All these things will I give thee, if thou wilt fall down and worship me. <text:line-break/><text:span text:style-name="T19">10</text:span> Then saith Jesus unto him, <text:span text:style-name="T27">Get thee hence, Satan: for it is written, Thou shalt worship the Lord thy God, and him only shalt thou serve.</text:span></text:p>
          </table:table-cell>
          <table:table-cell table:style-name="Table2.B2" office:value-type="string">
            <text:p text:style-name="P28">Law</text:p>
            <text:p text:style-name="P28">(<text:span text:style-name="T18">Deu 6:13,14</text:span>)</text:p>
          </table:table-cell>
        </table:table-row>
        <table:table-row>
          <table:table-cell table:style-name="Table2.A2" office:value-type="string">
            <text:p text:style-name="P29"><text:span text:style-name="T33">Jesus preaches first to the Jews, who heard the law every sabbath </text:span><text:span text:style-name="T34">and </text:span><text:span text:style-name="T35">generally tried to live by the law. </text:span><text:span text:style-name="T36">Generally, they lived and breathed in the law every day.</text:span></text:p>
            <text:p text:style-name="P29"/>
            <text:p text:style-name="P30"><text:span text:style-name="T18">Matthew 4:13-17</text:span><text:line-break/><text:span text:style-name="T19">13</text:span> And leaving Nazareth, he came and dwelt in Capernaum, which is upon the sea coast, in the borders of Zabulon and Nephthalim: <text:line-break/><text:span text:style-name="T19">14</text:span> That it might be fulfilled which was spoken by Esaias the prophet, saying, <text:line-break/><text:span text:style-name="T19">15</text:span> The land of Zabulon, and the land of Nephthalim, <text:span text:style-name="T20">by</text:span> the way of the sea, beyond Jordan, Galilee of the Gentiles; <text:line-break/><text:span text:style-name="T19">16</text:span> The people which sat in darkness saw great light; and to them which sat in the region and shadow of death light is sprung up. <text:line-break/><text:span text:style-name="T19">17</text:span> From that time Jesus began to preach, and to say, <text:span text:style-name="T37">Repent</text:span><text:span text:style-name="T27">: for the kingdom of heaven is at hand.</text:span></text:p>
          </table:table-cell>
          <table:table-cell table:style-name="Table2.B2" office:value-type="string">
            <text:p text:style-name="P31">Grace</text:p>
            <text:p text:style-name="P31">(<text:span text:style-name="T38">Acts 3:19</text:span>)</text:p>
          </table:table-cell>
        </table:table-row>
        <table:table-row>
          <table:table-cell table:style-name="Table2.A2" office:value-type="string">
            <text:p text:style-name="P24"><text:span text:style-name="T18">Matthew 4:18-19</text:span><text:line-break/><text:span text:style-name="T19">18</text:span> And Jesus, walking by the sea of Galilee, saw two brethren, Simon called Peter, and Andrew his brother, casting a net into the sea: for they were fishers. <text:line-break/><text:span text:style-name="T19">19</text:span> And he saith unto them, <text:span text:style-name="T37">Follow me</text:span><text:span text:style-name="T27">, and I will make you fishers of men.</text:span></text:p>
          </table:table-cell>
          <table:table-cell table:style-name="Table2.B2" office:value-type="string">
            <text:p text:style-name="P32">Grace</text:p>
            <text:p text:style-name="P32">(<text:span text:style-name="T18">John 15:16</text:span>)</text:p>
          </table:table-cell>
        </table:table-row>
        <table:table-row>
          <table:table-cell table:style-name="Table2.A2" office:value-type="string">
            <text:p text:style-name="P33">Matthew 5:3</text:p>
            <text:p text:style-name="P34">Blessed [are] the poor in spirit: for theirs is the kingdom of heaven.</text:p>
            <text:p text:style-name="P34"/>
            <text:p text:style-name="P35">Matthew 5:5</text:p>
            <text:p text:style-name="P36">Blessed [are] the meek: for they shall inherit the earth.</text:p>
            <text:p text:style-name="P37"/>
            <text:p text:style-name="P38">Matthew 5:6</text:p>
            <text:p text:style-name="P37">Blessed [are] they which do hunger and thirst after righteousness: for they shall be filled.</text:p>
          </table:table-cell>
          <table:table-cell table:style-name="Table2.B2" office:value-type="string">
            <text:p text:style-name="P39">Grace</text:p>
            <text:p text:style-name="P39"/>
          </table:table-cell>
        </table:table-row>
        <table:table-row>
          <table:table-cell table:style-name="Table2.A2" office:value-type="string">
            <text:p text:style-name="P24"><text:span text:style-name="T18">Matthew 8:1-3</text:span><text:line-break/><text:span text:style-name="T19">1</text:span> When he was come down from the mountain, great multitudes followed him. <text:line-break/><text:span text:style-name="T19">2</text:span> And, behold, <text:span text:style-name="T39">there came a leper and worshipped him</text:span>, saying, Lord, if thou wilt, thou canst make me clean. <text:line-break/><text:span text:style-name="T19">3</text:span> And Jesus put forth <text:span text:style-name="T20">his</text:span> hand, and touched him, saying, <text:span text:style-name="T27">I will; be thou clean.</text:span> And immediately his leprosy was cleansed.</text:p>
          </table:table-cell>
          <table:table-cell table:style-name="Table2.B2" office:value-type="string">
            <text:p text:style-name="P40">Grace</text:p>
          </table:table-cell>
        </table:table-row>
        <text:soft-page-break/>
        <table:table-row>
          <table:table-cell table:style-name="Table2.A2" office:value-type="string">
            <text:p text:style-name="P24"><text:span text:style-name="T18">Matthew 8:5-13</text:span><text:line-break/><text:span text:style-name="T19">5</text:span> And when Jesus was entered into Capernaum, there came unto him a centurion, beseeching him, <text:line-break/><text:span text:style-name="T19">6</text:span> And saying, Lord, my servant lieth at home sick of the palsy, grievously tormented. <text:line-break/><text:span text:style-name="T19">7</text:span> And Jesus saith unto him, <text:span text:style-name="T27">I will come and heal him.</text:span><text:line-break/><text:span text:style-name="T19">8</text:span> The centurion answered and said, Lord, <text:span text:style-name="T39">I am not worthy that thou shouldest come under my roof</text:span>: but speak the word only, and my servant shall be healed.<text:line-break/><text:span text:style-name="T19">9</text:span> For I am a man under authority, having soldiers under me: and I say to this <text:span text:style-name="T20">man</text:span>, Go, and he goeth; and to another, Come, and he cometh; and to my servant, Do this, and he doeth <text:span text:style-name="T20">it</text:span>. <text:line-break/><text:span text:style-name="T19">10</text:span> When Jesus heard <text:span text:style-name="T20">it</text:span>, <text:span text:style-name="T39">he marvelled</text:span>, and said to them that followed, <text:span text:style-name="T27">Verily I say unto you, </text:span><text:span text:style-name="T37">I have not found so great faith, no, not in Israel.</text:span><text:line-break/><text:span text:style-name="T19">11</text:span> <text:span text:style-name="T27">And I say unto you, That many shall come from the east and west, and shall sit down with Abraham, and Isaac, and Jacob, in the kingdom of heaven.</text:span><text:line-break/><text:span text:style-name="T19">12</text:span> <text:span text:style-name="T27">But the children of the kingdom shall be cast out into outer darkness: there shall be weeping and gnashing of teeth.</text:span><text:line-break/><text:span text:style-name="T19">13</text:span> And Jesus said unto the centurion, <text:span text:style-name="T27">Go thy way; and as thou hast believed, </text:span><text:span text:style-name="T40">so</text:span><text:span text:style-name="T27"> be it done unto thee.</text:span> And his servant was healed in the selfsame hour.</text:p>
          </table:table-cell>
          <table:table-cell table:style-name="Table2.B2" office:value-type="string">
            <text:p text:style-name="P41">Grace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08:52:48.454000000</meta:creation-date>
    <meta:editing-duration>PT2H58M18S</meta:editing-duration>
    <meta:editing-cycles>89</meta:editing-cycles>
    <meta:generator>LibreOffice/26.2.4.2$Linux_X86_64 LibreOffice_project/64a984c51f4702dbd3710b13428c673a2f1292e7</meta:generator>
    <dc:title>BibleStudyTemplate</dc:title>
    <dc:date>2026-07-11T12:20:20.171219106</dc:date>
    <meta:document-statistic meta:table-count="2" meta:image-count="0" meta:object-count="0" meta:page-count="4" meta:paragraph-count="66" meta:word-count="1281" meta:character-count="6807" meta:non-whitespace-character-count="5575"/>
    <meta:template xlink:type="simple" xlink:actuate="onRequest" xlink:title="BibleStudyTemplate" xlink:href="../../../../AppData/Roaming/LibreOffice/4/user/template/BibleStudyTemplate.ott" meta:date="2025-05-05T08:52:47.585000000"/>
  </office:meta>
</office:document-meta>
</file>