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automatic-styles>
    <style:style style:name="Table1" style:family="table">
      <style:table-properties style:width="5.2701in" table:align="center"/>
    </style:style>
    <style:style style:name="Table1.A" style:family="table-column">
      <style:table-column-properties style:column-width="1.3931in"/>
    </style:style>
    <style:style style:name="Table1.B" style:family="table-column">
      <style:table-column-properties style:column-width="2.1563in"/>
    </style:style>
    <style:style style:name="Table1.C" style:family="table-column">
      <style:table-column-properties style:column-width="1.7208in"/>
    </style:style>
    <style:style style:name="Table1.A1" style:family="table-cell">
      <style:table-cell-properties style:vertical-align="middle" fo:padding="0.0201in" fo:border-left="0.75pt solid #000000" fo:border-right="none" fo:border-top="0.75pt solid #000000" fo:border-bottom="0.75pt solid #000000"/>
    </style:style>
    <style:style style:name="Table1.C1" style:family="table-cell">
      <style:table-cell-properties style:vertical-align="middle" fo:padding="0.0201in" fo:border="0.75pt solid #000000"/>
    </style:style>
    <style:style style:name="Table1.A2" style:family="table-cell">
      <style:table-cell-properties style:vertical-align="middle" fo:padding="0.0201in" fo:border-left="0.75pt solid #000000" fo:border-right="none" fo:border-top="none" fo:border-bottom="0.75pt solid #000000"/>
    </style:style>
    <style:style style:name="Table1.C2" style:family="table-cell">
      <style:table-cell-properties style:vertical-align="middle" fo:padding="0.0201in" fo:border-left="0.75pt solid #000000" fo:border-right="0.75pt solid #000000" fo:border-top="none" fo:border-bottom="0.75pt solid #000000"/>
    </style:style>
    <style:style style:name="Table2" style:family="table">
      <style:table-properties style:width="7.8979in" table:align="left"/>
    </style:style>
    <style:style style:name="Table2.A" style:family="table-column">
      <style:table-column-properties style:column-width="1.1604in"/>
    </style:style>
    <style:style style:name="Table2.B" style:family="table-column">
      <style:table-column-properties style:column-width="6.7375in"/>
    </style:style>
    <style:style style:name="Table2.A1" style:family="table-cell">
      <style:table-cell-properties style:vertical-align="middle" fo:padding="0.0201in" fo:border-left="0.75pt solid #000000" fo:border-right="none" fo:border-top="0.75pt solid #000000" fo:border-bottom="0.75pt solid #000000"/>
    </style:style>
    <style:style style:name="Table2.B1" style:family="table-cell">
      <style:table-cell-properties fo:padding="0.0201in" fo:border="0.75pt solid #000000"/>
    </style:style>
    <style:style style:name="Table2.A2" style:family="table-cell">
      <style:table-cell-properties style:vertical-align="middle" fo:padding="0.0201in" fo:border-left="0.75pt solid #000000" fo:border-right="none" fo:border-top="none" fo:border-bottom="0.75pt solid #000000"/>
    </style:style>
    <style:style style:name="Table2.B2" style:family="table-cell">
      <style:table-cell-properties fo:padding="0.0201in" fo:border-left="0.75pt solid #000000" fo:border-right="0.75pt solid #000000" fo:border-top="none" fo:border-bottom="0.75pt solid #000000"/>
    </style:style>
    <style:style style:name="Table2.B3" style:family="table-cell">
      <style:table-cell-properties fo:padding="0.0201in" fo:border-left="0.75pt solid #000000" fo:border-right="0.75pt solid #000000" fo:border-top="none" fo:border-bottom="0.75pt solid #000000"/>
    </style:style>
    <style:style style:name="Table4" style:family="table">
      <style:table-properties style:width="7.9in" table:align="margins"/>
    </style:style>
    <style:style style:name="Table4.A" style:family="table-column">
      <style:table-column-properties style:column-width="1.1306in" style:rel-column-width="9378*"/>
    </style:style>
    <style:style style:name="Table4.B" style:family="table-column">
      <style:table-column-properties style:column-width="1.0035in" style:rel-column-width="8324*"/>
    </style:style>
    <style:style style:name="Table4.C" style:family="table-column">
      <style:table-column-properties style:column-width="5.766in" style:rel-column-width="47833*"/>
    </style:style>
    <style:style style:name="Table4.A1" style:family="table-cell">
      <style:table-cell-properties style:vertical-align="middle" fo:padding="0.0201in" fo:border="0.75pt solid #000000"/>
    </style:style>
    <style:style style:name="Table4.A2" style:family="table-cell">
      <style:table-cell-properties style:vertical-align="middle" fo:padding="0.0201in" fo:border-left="0.75pt solid #000000" fo:border-right="none" fo:border-top="none" fo:border-bottom="0.75pt solid #000000"/>
    </style:style>
    <style:style style:name="Table4.C2" style:family="table-cell">
      <style:table-cell-properties style:vertical-align="middle" fo:padding="0.0201in" fo:border-left="0.75pt solid #000000" fo:border-right="0.75pt solid #000000" fo:border-top="none" fo:border-bottom="0.75pt solid #000000"/>
    </style:style>
    <style:style style:name="Table3" style:family="table">
      <style:table-properties style:width="7.9in" table:align="margins"/>
    </style:style>
    <style:style style:name="Table3.A" style:family="table-column">
      <style:table-column-properties style:column-width="0.7868in" style:rel-column-width="6525*"/>
    </style:style>
    <style:style style:name="Table3.B" style:family="table-column">
      <style:table-column-properties style:column-width="7.1132in" style:rel-column-width="59010*"/>
    </style:style>
    <style:style style:name="Table3.A1" style:family="table-cell">
      <style:table-cell-properties style:vertical-align="middle" fo:padding="0.0201in" fo:border-left="0.75pt solid #000000" fo:border-right="none" fo:border-top="0.75pt solid #000000" fo:border-bottom="0.75pt solid #000000"/>
    </style:style>
    <style:style style:name="Table3.B1" style:family="table-cell">
      <style:table-cell-properties fo:padding="0.0201in" fo:border="0.75pt solid #000000"/>
    </style:style>
    <style:style style:name="Table3.A2" style:family="table-cell">
      <style:table-cell-properties style:vertical-align="middle" fo:padding="0.0201in" fo:border-left="0.75pt solid #000000" fo:border-right="none" fo:border-top="none" fo:border-bottom="0.75pt solid #000000"/>
    </style:style>
    <style:style style:name="Table3.B2" style:family="table-cell">
      <style:table-cell-properties fo:padding="0.0201in" fo:border-left="0.75pt solid #000000" fo:border-right="0.75pt solid #000000" fo:border-top="none" fo:border-bottom="0.75pt solid #000000"/>
    </style:style>
    <style:style style:name="Table3.B3" style:family="table-cell">
      <style:table-cell-properties fo:padding="0.0201in" fo:border-left="0.75pt solid #000000" fo:border-right="0.75pt solid #000000" fo:border-top="none" fo:border-bottom="0.75pt solid #000000"/>
    </style:style>
    <style:style style:name="Table5" style:family="table">
      <style:table-properties style:width="7.8979in" table:align="left"/>
    </style:style>
    <style:style style:name="Table5.A" style:family="table-column">
      <style:table-column-properties style:column-width="5.7868in"/>
    </style:style>
    <style:style style:name="Table5.B" style:family="table-column">
      <style:table-column-properties style:column-width="2.1111in"/>
    </style:style>
    <style:style style:name="Table5.A1" style:family="table-cell">
      <style:table-cell-properties fo:padding="0.0382in" fo:border-left="0.75pt solid #000000" fo:border-right="none" fo:border-top="0.75pt solid #000000" fo:border-bottom="0.75pt solid #000000"/>
    </style:style>
    <style:style style:name="Table5.B1" style:family="table-cell">
      <style:table-cell-properties fo:padding="0.0382in" fo:border="0.75pt solid #000000"/>
    </style:style>
    <style:style style:name="Table5.A2" style:family="table-cell">
      <style:table-cell-properties fo:padding="0.0382in" fo:border-left="0.75pt solid #000000" fo:border-right="none" fo:border-top="none" fo:border-bottom="0.75pt solid #000000"/>
    </style:style>
    <style:style style:name="Table5.B2" style:family="table-cell">
      <style:table-cell-properties fo:padding="0.0382in" fo:border-left="0.75pt solid #000000" fo:border-right="0.75pt solid #000000" fo:border-top="none" fo:border-bottom="0.75pt solid #000000"/>
    </style:style>
    <style:style style:name="Table5.4" style:family="table-row">
      <style:table-row-properties style:min-row-height="0.6972in"/>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style:font-name="Gabriela" fo:font-size="14pt" officeooo:rsid="008e8fa1" officeooo:paragraph-rsid="008e8fa1" style:font-size-asian="14pt" style:font-size-complex="14pt"/>
    </style:style>
    <style:style style:name="P2" style:family="paragraph" style:parent-style-name="Standard">
      <style:paragraph-properties fo:text-align="center" style:justify-single-word="false"/>
      <style:text-properties fo:font-size="10pt" officeooo:rsid="008e8fa1" officeooo:paragraph-rsid="008e8fa1" style:font-size-asian="10pt" style:font-size-complex="10pt"/>
    </style:style>
    <style:style style:name="P3" style:family="paragraph" style:parent-style-name="Standard">
      <style:text-properties style:font-name="Liberation Sans" officeooo:rsid="001a8a02" officeooo:paragraph-rsid="001a8a02"/>
    </style:style>
    <style:style style:name="P4" style:family="paragraph" style:parent-style-name="Standard">
      <style:text-properties style:font-name="Liberation Sans"/>
    </style:style>
    <style:style style:name="P5" style:family="paragraph" style:parent-style-name="Table_20_Contents">
      <style:paragraph-properties fo:margin-left="0in" fo:margin-right="0in" fo:margin-top="0in" fo:margin-bottom="0in" style:contextual-spacing="false" fo:line-height="114%" fo:text-indent="0in" style:auto-text-indent="false"/>
    </style:style>
    <style:style style:name="P6"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weight="bold"/>
    </style:style>
    <style:style style:name="P7"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style:style>
    <style:style style:name="P8"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tyle="italic"/>
    </style:style>
    <style:style style:name="P9" style:family="paragraph" style:parent-style-name="Standard">
      <style:text-properties style:font-name="Liberation Sans" fo:font-size="12pt" style:font-size-asian="12pt" style:font-size-complex="12pt"/>
    </style:style>
    <style:style style:name="P10" style:family="paragraph" style:parent-style-name="Standard">
      <style:text-properties style:font-name="Liberation Sans" fo:font-size="12pt" officeooo:rsid="001d3419" officeooo:paragraph-rsid="001d3419" style:font-size-asian="12pt" style:font-size-complex="12pt"/>
    </style:style>
    <style:style style:name="P11" style:family="paragraph" style:parent-style-name="Table_20_Contents">
      <style:text-properties fo:color="#127622" loext:opacity="100%" fo:font-size="12pt" officeooo:paragraph-rsid="00214782" style:font-size-asian="12pt" style:font-size-complex="12pt"/>
    </style:style>
    <style:style style:name="P12" style:family="paragraph" style:parent-style-name="Table_20_Contents">
      <style:text-properties fo:font-size="12pt" officeooo:paragraph-rsid="00214782" style:font-size-asian="12pt" style:font-size-complex="12pt"/>
    </style:style>
    <style:style style:name="P13" style:family="paragraph" style:parent-style-name="Table_20_Contents">
      <style:text-properties fo:font-size="12pt" officeooo:rsid="001e11bb" officeooo:paragraph-rsid="001e11bb" style:font-size-asian="12pt" style:font-size-complex="12pt"/>
    </style:style>
    <style:style style:name="P14" style:family="paragraph" style:parent-style-name="Table_20_Contents">
      <style:text-properties fo:color="#127622" loext:opacity="100%" fo:font-size="12pt" officeooo:paragraph-rsid="002b5c43" style:font-size-asian="12pt" style:font-size-complex="12pt"/>
    </style:style>
    <style:style style:name="P15" style:family="paragraph" style:parent-style-name="Table_20_Contents">
      <style:text-properties fo:font-size="12pt" officeooo:paragraph-rsid="002b5c43" style:font-size-asian="12pt" style:font-size-complex="12pt"/>
    </style:style>
    <style:style style:name="P16" style:family="paragraph" style:parent-style-name="Table_20_Contents">
      <style:text-properties fo:font-size="12pt" officeooo:rsid="00227b1e" officeooo:paragraph-rsid="00227b1e" style:font-size-asian="12pt" style:font-size-complex="12pt"/>
    </style:style>
    <style:style style:name="P17" style:family="paragraph" style:parent-style-name="Table_20_Contents">
      <style:text-properties fo:color="#127622" loext:opacity="100%" fo:font-size="12pt" officeooo:paragraph-rsid="002cc68f" style:font-size-asian="12pt" style:font-size-complex="12pt"/>
    </style:style>
    <style:style style:name="P18" style:family="paragraph" style:parent-style-name="Table_20_Contents">
      <style:text-properties fo:font-size="12pt" officeooo:paragraph-rsid="002cc68f" style:font-size-asian="12pt" style:font-size-complex="12pt"/>
    </style:style>
    <style:style style:name="P19" style:family="paragraph" style:parent-style-name="Standard">
      <style:text-properties style:font-name="Liberation Sans" fo:font-size="12pt" officeooo:paragraph-rsid="002da040" style:font-size-asian="12pt" style:font-size-complex="12pt"/>
    </style:style>
    <style:style style:name="P20" style:family="paragraph" style:parent-style-name="Standard">
      <style:text-properties officeooo:paragraph-rsid="00bb4a0a"/>
    </style:style>
    <style:style style:name="P21"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text-properties fo:font-weight="bold" officeooo:rsid="00bc9195" officeooo:paragraph-rsid="00bc9195" style:font-weight-asian="bold" style:font-weight-complex="bold"/>
    </style:style>
    <style:style style:name="P22"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23" style:family="paragraph" style:parent-style-name="Table_20_Contents">
      <style:paragraph-properties fo:margin-left="0in" fo:margin-right="0in" fo:margin-top="0in" fo:margin-bottom="0.0972in" style:contextual-spacing="false" fo:line-height="114%" fo:text-align="center" style:justify-single-word="false" fo:text-indent="0in" style:auto-text-indent="false"/>
      <style:text-properties style:font-name="Liberation Sans" fo:font-size="12pt" fo:font-weight="bold" style:font-size-asian="12pt" style:font-size-complex="12pt"/>
    </style:style>
    <style:style style:name="P24"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fo:font-style="italic" style:font-size-asian="12pt" style:font-size-complex="12pt"/>
    </style:style>
    <style:style style:name="P25" style:family="paragraph" style:parent-style-name="Table_20_Contents">
      <style:paragraph-properties fo:margin-left="0in" fo:margin-right="0in" fo:margin-top="0in" fo:margin-bottom="0.0972in" style:contextual-spacing="false" fo:line-height="114%" fo:text-indent="0in" style:auto-text-indent="false"/>
      <style:text-properties style:font-name="Liberation Sans" fo:font-size="12pt" style:font-size-asian="12pt" style:font-size-complex="12pt"/>
    </style:style>
    <style:style style:name="P26" style:family="paragraph" style:parent-style-name="Standard">
      <style:text-properties officeooo:paragraph-rsid="009f59d9"/>
    </style:style>
    <style:style style:name="P27" style:family="paragraph" style:parent-style-name="Standard">
      <style:paragraph-properties fo:text-align="center" style:justify-single-word="false"/>
      <style:text-properties officeooo:paragraph-rsid="0038da69"/>
    </style:style>
    <style:style style:name="P28" style:family="paragraph" style:parent-style-name="Standard">
      <style:text-properties style:font-name="Liberation Sans" fo:font-size="12pt" officeooo:rsid="00317bdb" officeooo:paragraph-rsid="00317bdb" style:font-size-asian="12pt" style:font-size-complex="12pt"/>
    </style:style>
    <style:style style:name="P29" style:family="paragraph" style:parent-style-name="Standard">
      <style:text-properties style:font-name="Liberation Sans" fo:font-size="12pt" officeooo:rsid="002da040" officeooo:paragraph-rsid="002da040" style:font-size-asian="12pt" style:font-size-complex="12pt"/>
    </style:style>
    <style:style style:name="P30" style:family="paragraph" style:parent-style-name="Standard" style:list-style-name="L1">
      <style:text-properties style:font-name="Liberation Sans" fo:font-size="12pt" officeooo:rsid="003d3b32" officeooo:paragraph-rsid="003d3b32" style:font-size-asian="12pt" style:font-size-complex="12pt"/>
    </style:style>
    <style:style style:name="P31" style:family="paragraph" style:parent-style-name="Standard" style:list-style-name="L1">
      <style:text-properties style:font-name="Liberation Sans" fo:font-size="12pt" officeooo:rsid="003ec73a" officeooo:paragraph-rsid="003ec73a" style:font-size-asian="12pt" style:font-size-complex="12pt"/>
    </style:style>
    <style:style style:name="P32" style:family="paragraph" style:parent-style-name="Standard" style:list-style-name="L2">
      <style:text-properties style:font-name="Liberation Sans" fo:font-size="12pt" officeooo:rsid="004040c7" officeooo:paragraph-rsid="004040c7" style:font-size-asian="12pt" style:font-size-complex="12pt"/>
    </style:style>
    <style:style style:name="P33" style:family="paragraph" style:parent-style-name="Standard" style:list-style-name="L2">
      <style:text-properties style:font-name="Liberation Sans" fo:font-size="12pt" officeooo:rsid="00406968" officeooo:paragraph-rsid="00406968" style:font-size-asian="12pt" style:font-size-complex="12pt"/>
    </style:style>
    <style:style style:name="P34" style:family="paragraph" style:parent-style-name="Standard" style:list-style-name="L3">
      <style:text-properties style:font-name="Liberation Sans" fo:font-size="12pt" officeooo:rsid="0045e7f1" officeooo:paragraph-rsid="0045e7f1" style:font-size-asian="12pt" style:font-size-complex="12pt"/>
    </style:style>
    <style:style style:name="P35" style:family="paragraph" style:parent-style-name="Standard" style:list-style-name="L3">
      <style:text-properties style:font-name="Liberation Sans" fo:font-size="12pt" officeooo:rsid="00479e79" officeooo:paragraph-rsid="00479e79" style:font-size-asian="12pt" style:font-size-complex="12pt"/>
    </style:style>
    <style:style style:name="P36" style:family="paragraph" style:parent-style-name="Standard">
      <style:text-properties style:font-name="Liberation Sans" fo:font-size="12pt" officeooo:rsid="006b5e21" officeooo:paragraph-rsid="006b5e21" style:font-size-asian="12pt" style:font-size-complex="12pt"/>
    </style:style>
    <style:style style:name="P37" style:family="paragraph" style:parent-style-name="Table_20_Contents">
      <style:paragraph-properties fo:text-align="center" style:justify-single-word="false"/>
      <style:text-properties fo:font-size="12pt" officeooo:rsid="0055955e" officeooo:paragraph-rsid="0055955e" style:font-size-asian="12pt" style:font-size-complex="12pt"/>
    </style:style>
    <style:style style:name="P38" style:family="paragraph" style:parent-style-name="Table_20_Contents">
      <style:text-properties fo:color="#127622" loext:opacity="100%" officeooo:paragraph-rsid="0055955e"/>
    </style:style>
    <style:style style:name="P39" style:family="paragraph" style:parent-style-name="Table_20_Contents">
      <style:text-properties officeooo:paragraph-rsid="0055955e"/>
    </style:style>
    <style:style style:name="P40" style:family="paragraph" style:parent-style-name="Table_20_Contents">
      <style:paragraph-properties fo:text-align="center" style:justify-single-word="false"/>
      <style:text-properties fo:font-size="12pt" officeooo:rsid="002f6b03" officeooo:paragraph-rsid="002f6b03" style:font-size-asian="12pt" style:font-size-complex="12pt"/>
    </style:style>
    <style:style style:name="P41" style:family="paragraph" style:parent-style-name="Table_20_Contents">
      <style:text-properties fo:color="#127622" loext:opacity="100%" fo:font-size="12pt" officeooo:paragraph-rsid="002f6b03" style:font-size-asian="12pt" style:font-size-complex="12pt"/>
    </style:style>
    <style:style style:name="P42" style:family="paragraph" style:parent-style-name="Table_20_Contents">
      <style:text-properties fo:font-size="12pt" officeooo:paragraph-rsid="002f6b03" style:font-size-asian="12pt" style:font-size-complex="12pt"/>
    </style:style>
    <style:style style:name="P43" style:family="paragraph" style:parent-style-name="Table_20_Contents">
      <style:text-properties fo:font-size="12pt" style:font-size-asian="12pt" style:font-size-complex="12pt"/>
    </style:style>
    <style:style style:name="P44" style:family="paragraph" style:parent-style-name="Table_20_Contents">
      <style:paragraph-properties fo:text-align="center" style:justify-single-word="false"/>
      <style:text-properties fo:font-size="12pt" officeooo:rsid="0054af9c" officeooo:paragraph-rsid="0054af9c" style:font-size-asian="12pt" style:font-size-complex="12pt"/>
    </style:style>
    <style:style style:name="P45" style:family="paragraph" style:parent-style-name="Table_20_Contents">
      <style:text-properties fo:color="#127622" loext:opacity="100%" fo:font-size="12pt" officeooo:paragraph-rsid="0054af9c" style:font-size-asian="12pt" style:font-size-complex="12pt"/>
    </style:style>
    <style:style style:name="P46" style:family="paragraph" style:parent-style-name="Table_20_Contents">
      <style:text-properties fo:font-size="12pt" officeooo:paragraph-rsid="0054af9c" style:font-size-asian="12pt" style:font-size-complex="12pt"/>
    </style:style>
    <style:style style:name="P47" style:family="paragraph" style:parent-style-name="Standard">
      <style:text-properties style:font-name="Liberation Sans" fo:font-size="12pt" officeooo:rsid="006ff7a0" officeooo:paragraph-rsid="006ff7a0" style:font-size-asian="12pt" style:font-size-complex="12pt"/>
    </style:style>
    <style:style style:name="P48" style:family="paragraph" style:parent-style-name="Standard">
      <style:text-properties style:font-name="Liberation Sans" fo:font-size="12pt" fo:font-style="normal" officeooo:rsid="00729ed3" officeooo:paragraph-rsid="006ff7a0" style:font-size-asian="12pt" style:font-style-asian="normal" style:font-size-complex="12pt" style:font-style-complex="normal"/>
    </style:style>
    <style:style style:name="P49" style:family="paragraph" style:parent-style-name="Table_20_Contents">
      <style:paragraph-properties fo:text-align="center" style:justify-single-word="false"/>
      <style:text-properties fo:font-size="12pt" fo:font-weight="bold" officeooo:rsid="0078ce06" officeooo:paragraph-rsid="0078ce06" style:font-size-asian="12pt" style:font-weight-asian="bold" style:font-size-complex="12pt" style:font-weight-complex="bold"/>
    </style:style>
    <style:style style:name="P50" style:family="paragraph" style:parent-style-name="Table_20_Contents">
      <style:text-properties fo:font-size="12pt" fo:font-weight="bold" officeooo:paragraph-rsid="00747016" style:font-size-asian="12pt" style:font-weight-asian="bold" style:font-size-complex="12pt" style:font-weight-complex="bold"/>
    </style:style>
    <style:style style:name="P51" style:family="paragraph" style:parent-style-name="Table_20_Contents">
      <style:text-properties fo:font-size="12pt" officeooo:paragraph-rsid="00747016" style:font-size-asian="12pt" style:font-size-complex="12pt"/>
    </style:style>
    <style:style style:name="P52" style:family="paragraph" style:parent-style-name="Table_20_Contents">
      <style:text-properties fo:font-size="12pt" officeooo:paragraph-rsid="0075bd3f" style:font-size-asian="12pt" style:font-size-complex="12pt"/>
    </style:style>
    <style:style style:name="P53" style:family="paragraph" style:parent-style-name="Table_20_Contents">
      <style:text-properties fo:font-size="12pt" fo:font-weight="bold" officeooo:rsid="00906f77" officeooo:paragraph-rsid="00906f77" style:font-size-asian="12pt" style:font-weight-asian="bold" style:font-size-complex="12pt" style:font-weight-complex="bold"/>
    </style:style>
    <style:style style:name="P54" style:family="paragraph" style:parent-style-name="Table_20_Contents">
      <style:text-properties fo:font-size="12pt" officeooo:rsid="00906f77" officeooo:paragraph-rsid="00906f77" style:font-size-asian="12pt" style:font-size-complex="12pt"/>
    </style:style>
    <style:style style:name="P55" style:family="paragraph" style:parent-style-name="Table_20_Contents">
      <style:text-properties fo:font-size="12pt" officeooo:paragraph-rsid="007673e3" style:font-size-asian="12pt" style:font-size-complex="12pt"/>
    </style:style>
    <style:style style:name="P56" style:family="paragraph" style:parent-style-name="Table_20_Contents">
      <style:text-properties fo:font-size="12pt" fo:font-weight="bold" officeooo:paragraph-rsid="007673e3" style:font-size-asian="12pt" style:font-weight-asian="bold" style:font-size-complex="12pt" style:font-weight-complex="bold"/>
    </style:style>
    <style:style style:name="P57" style:family="paragraph" style:parent-style-name="Table_20_Contents">
      <style:text-properties fo:font-size="12pt" officeooo:rsid="0077e6b0" officeooo:paragraph-rsid="0077e6b0" style:font-size-asian="12pt" style:font-size-complex="12pt"/>
    </style:style>
    <style:style style:name="P58" style:family="paragraph" style:parent-style-name="Table_20_Contents">
      <style:text-properties fo:font-size="12pt" officeooo:paragraph-rsid="0077a131" style:font-size-asian="12pt" style:font-size-complex="12pt"/>
    </style:style>
    <style:style style:name="P59" style:family="paragraph" style:parent-style-name="Table_20_Contents">
      <style:text-properties fo:font-size="12pt" officeooo:rsid="00795dd3" officeooo:paragraph-rsid="00795dd3" style:font-size-asian="12pt" style:font-size-complex="12pt"/>
    </style:style>
    <style:style style:name="P60" style:family="paragraph" style:parent-style-name="Table_20_Contents">
      <style:text-properties fo:font-size="12pt" officeooo:rsid="007a2624" officeooo:paragraph-rsid="007a2624" style:font-size-asian="12pt" style:font-size-complex="12pt"/>
    </style:style>
    <style:style style:name="P61" style:family="paragraph" style:parent-style-name="Table_20_Contents">
      <style:text-properties fo:font-size="12pt" officeooo:rsid="00795dd3" officeooo:paragraph-rsid="007c5cf3" style:font-size-asian="12pt" style:font-size-complex="12pt"/>
    </style:style>
    <style:style style:name="P62" style:family="paragraph" style:parent-style-name="Standard">
      <style:text-properties style:font-name="Liberation Sans" fo:font-size="12pt" fo:font-style="normal" officeooo:rsid="007dd3b6" officeooo:paragraph-rsid="007dd3b6" style:font-size-asian="12pt" style:font-style-asian="normal" style:font-size-complex="12pt" style:font-style-complex="normal"/>
    </style:style>
    <style:style style:name="P63" style:family="paragraph" style:parent-style-name="Standard">
      <style:text-properties style:font-name="Liberation Sans" fo:font-size="12pt" fo:font-style="normal" fo:font-weight="bold" officeooo:rsid="007dd3b6" officeooo:paragraph-rsid="007dd3b6" style:font-size-asian="12pt" style:font-style-asian="normal" style:font-weight-asian="bold" style:font-size-complex="12pt" style:font-style-complex="normal" style:font-weight-complex="bold"/>
    </style:style>
    <style:style style:name="P64" style:family="paragraph" style:parent-style-name="Standard" style:list-style-name="L4">
      <style:text-properties style:font-name="Liberation Sans" fo:font-size="12pt" fo:font-style="normal" officeooo:rsid="007dd3b6" officeooo:paragraph-rsid="007dd3b6" style:font-size-asian="12pt" style:font-style-asian="normal" style:font-size-complex="12pt" style:font-style-complex="normal"/>
    </style:style>
    <style:style style:name="P65" style:family="paragraph" style:parent-style-name="Standard">
      <style:text-properties style:font-name="Liberation Sans" fo:font-size="12pt" fo:font-style="normal" officeooo:rsid="00828d4e" officeooo:paragraph-rsid="00828d4e" style:font-size-asian="12pt" style:font-style-asian="normal" style:font-size-complex="12pt" style:font-style-complex="normal"/>
    </style:style>
    <style:style style:name="P66" style:family="paragraph" style:parent-style-name="Standard">
      <style:text-properties style:font-name="Liberation Sans" fo:font-size="12pt" fo:font-style="normal" officeooo:rsid="00828d4e" officeooo:paragraph-rsid="00838b73" style:font-size-asian="12pt" style:font-style-asian="normal" style:font-size-complex="12pt" style:font-style-complex="normal"/>
    </style:style>
    <style:style style:name="P67" style:family="paragraph" style:parent-style-name="Standard">
      <style:text-properties style:font-name="Liberation Sans" fo:font-size="12pt" fo:font-style="normal" officeooo:rsid="00d947a1" officeooo:paragraph-rsid="00d947a1" style:font-size-asian="12pt" style:font-style-asian="normal" style:font-size-complex="12pt" style:font-style-complex="normal"/>
    </style:style>
    <style:style style:name="P68" style:family="paragraph" style:parent-style-name="Table_20_Contents">
      <style:text-properties fo:color="#127622" loext:opacity="100%" fo:font-size="12pt" style:font-size-asian="12pt" style:font-size-complex="12pt"/>
    </style:style>
    <style:style style:name="P69" style:family="paragraph" style:parent-style-name="Standard">
      <style:text-properties officeooo:paragraph-rsid="00e3a0f3"/>
    </style:style>
    <style:style style:name="P70" style:family="paragraph" style:parent-style-name="Standard">
      <style:text-properties style:font-name="Liberation Sans" fo:font-size="12pt" fo:font-style="normal" officeooo:rsid="00e885f9" officeooo:paragraph-rsid="00e3a0f3" style:font-size-asian="12pt" style:font-style-asian="normal" style:font-size-complex="12pt" style:font-style-complex="normal"/>
    </style:style>
    <style:style style:name="P71" style:family="paragraph" style:parent-style-name="Standard">
      <style:text-properties style:font-name="Liberation Sans" fo:font-size="12pt" fo:font-style="normal" officeooo:rsid="00f1cde3" officeooo:paragraph-rsid="00f1cde3" style:font-size-asian="12pt" style:font-style-asian="normal" style:font-size-complex="12pt" style:font-style-complex="normal"/>
    </style:style>
    <style:style style:name="P72" style:family="paragraph" style:parent-style-name="Standard">
      <style:text-properties style:font-name="Liberation Sans" fo:font-size="12pt" fo:font-style="normal" officeooo:rsid="008d308f" officeooo:paragraph-rsid="008d308f" style:font-size-asian="12pt" style:font-style-asian="normal" style:font-size-complex="12pt" style:font-style-complex="normal"/>
    </style:style>
    <style:style style:name="P73" style:family="paragraph" style:parent-style-name="Standard">
      <style:text-properties officeooo:paragraph-rsid="00c16314"/>
    </style:style>
    <style:style style:name="T1" style:family="text">
      <style:text-properties officeooo:rsid="00915566"/>
    </style:style>
    <style:style style:name="T2" style:family="text">
      <style:text-properties officeooo:rsid="0091f2fd"/>
    </style:style>
    <style:style style:name="T3" style:family="text">
      <style:text-properties fo:font-weight="bold" officeooo:rsid="0091f2fd" style:font-weight-asian="bold" style:font-weight-complex="bold"/>
    </style:style>
    <style:style style:name="T4" style:family="text">
      <style:text-properties officeooo:rsid="00951820"/>
    </style:style>
    <style:style style:name="T5" style:family="text">
      <style:text-properties officeooo:rsid="00932a7a"/>
    </style:style>
    <style:style style:name="T6" style:family="text">
      <style:text-properties fo:color="#127622" loext:opacity="100%" officeooo:rsid="00932a7a"/>
    </style:style>
    <style:style style:name="T7" style:family="text">
      <style:text-properties style:font-name="Liberation Sans"/>
    </style:style>
    <style:style style:name="T8" style:family="text">
      <style:text-properties fo:font-style="italic" fo:font-weight="bold" style:font-weight-asian="bold" style:font-weight-complex="bold"/>
    </style:style>
    <style:style style:name="T9" style:family="text">
      <style:text-properties officeooo:rsid="00209d12"/>
    </style:style>
    <style:style style:name="T10" style:family="text">
      <style:text-properties fo:color="#ff0000" loext:opacity="100%" officeooo:rsid="00a04351"/>
    </style:style>
    <style:style style:name="T11" style:family="text">
      <style:text-properties fo:font-weight="bold" style:font-weight-asian="bold" style:font-weight-complex="bold"/>
    </style:style>
    <style:style style:name="T12" style:family="text">
      <style:text-properties fo:background-color="#fff5ce" loext:char-shading-value="0"/>
    </style:style>
    <style:style style:name="T13" style:family="text">
      <style:text-properties style:text-position="super 58%"/>
    </style:style>
    <style:style style:name="T14" style:family="text">
      <style:text-properties officeooo:rsid="009f59d9"/>
    </style:style>
    <style:style style:name="T15" style:family="text">
      <style:text-properties officeooo:rsid="00a0a5af"/>
    </style:style>
    <style:style style:name="T16" style:family="text">
      <style:text-properties officeooo:rsid="00a00bac"/>
    </style:style>
    <style:style style:name="T17" style:family="text">
      <style:text-properties officeooo:rsid="00a4d3f4"/>
    </style:style>
    <style:style style:name="T18" style:family="text">
      <style:text-properties officeooo:rsid="00a5f3e5"/>
    </style:style>
    <style:style style:name="T19" style:family="text">
      <style:text-properties officeooo:rsid="00a6d2b2"/>
    </style:style>
    <style:style style:name="T20" style:family="text">
      <style:text-properties officeooo:rsid="00aa052a"/>
    </style:style>
    <style:style style:name="T21" style:family="text">
      <style:text-properties fo:color="#127622" loext:opacity="100%" officeooo:rsid="00aa052a"/>
    </style:style>
    <style:style style:name="T22" style:family="text">
      <style:text-properties officeooo:rsid="00a73e87"/>
    </style:style>
    <style:style style:name="T23" style:family="text">
      <style:text-properties fo:color="#127622" loext:opacity="100%" officeooo:rsid="00a73e87"/>
    </style:style>
    <style:style style:name="T24" style:family="text">
      <style:text-properties officeooo:rsid="00a9363b"/>
    </style:style>
    <style:style style:name="T25" style:family="text">
      <style:text-properties officeooo:rsid="00aa1d56"/>
    </style:style>
    <style:style style:name="T26" style:family="text">
      <style:text-properties fo:font-style="italic" officeooo:rsid="00aa1d56" style:font-style-asian="italic" style:font-style-complex="italic"/>
    </style:style>
    <style:style style:name="T27" style:family="text">
      <style:text-properties fo:font-style="italic" style:font-style-asian="italic" style:font-style-complex="italic"/>
    </style:style>
    <style:style style:name="T28" style:family="text">
      <style:text-properties style:font-name="Liberation Sans" fo:font-size="12pt" style:font-size-asian="12pt" style:font-size-complex="12pt"/>
    </style:style>
    <style:style style:name="T29" style:family="text">
      <style:text-properties fo:font-style="italic"/>
    </style:style>
    <style:style style:name="T30" style:family="text">
      <style:text-properties style:font-name="Gabriela" fo:font-size="12pt" officeooo:rsid="004fedfe" style:font-size-asian="12pt" style:font-size-complex="12pt"/>
    </style:style>
    <style:style style:name="T31" style:family="text">
      <style:text-properties style:font-name="Gabriela" fo:font-size="12pt" officeooo:rsid="0038da69" style:font-size-asian="12pt" style:font-size-complex="12pt"/>
    </style:style>
    <style:style style:name="T32" style:family="text">
      <style:text-properties officeooo:rsid="003a5e6a"/>
    </style:style>
    <style:style style:name="T33" style:family="text">
      <style:text-properties officeooo:rsid="00ac9fbe"/>
    </style:style>
    <style:style style:name="T34" style:family="text">
      <style:text-properties fo:color="#ff0000" loext:opacity="100%" officeooo:rsid="00ac9fbe"/>
    </style:style>
    <style:style style:name="T35" style:family="text">
      <style:text-properties officeooo:rsid="00335355"/>
    </style:style>
    <style:style style:name="T36" style:family="text">
      <style:text-properties officeooo:rsid="0034ad48"/>
    </style:style>
    <style:style style:name="T37" style:family="text">
      <style:text-properties fo:font-style="italic" officeooo:rsid="0034ad48" style:font-style-asian="italic" style:font-style-complex="italic"/>
    </style:style>
    <style:style style:name="T38" style:family="text">
      <style:text-properties fo:font-style="normal" officeooo:rsid="0034ad48" style:font-style-asian="normal" style:font-style-complex="normal"/>
    </style:style>
    <style:style style:name="T39" style:family="text">
      <style:text-properties fo:font-style="normal" officeooo:rsid="003b3628" style:font-style-asian="normal" style:font-style-complex="normal"/>
    </style:style>
    <style:style style:name="T40" style:family="text">
      <style:text-properties fo:font-style="normal" officeooo:rsid="00ae9c3a" style:font-style-asian="normal" style:font-style-complex="normal"/>
    </style:style>
    <style:style style:name="T41" style:family="text">
      <style:text-properties fo:font-style="normal" officeooo:rsid="00361038" style:font-style-asian="normal" style:font-style-complex="normal"/>
    </style:style>
    <style:style style:name="T42" style:family="text">
      <style:text-properties officeooo:rsid="00365aca"/>
    </style:style>
    <style:style style:name="T43" style:family="text">
      <style:text-properties officeooo:rsid="004ccd66"/>
    </style:style>
    <style:style style:name="T44" style:family="text">
      <style:text-properties officeooo:rsid="00603f7b"/>
    </style:style>
    <style:style style:name="T45" style:family="text">
      <style:text-properties fo:color="#ff0000" loext:opacity="100%" officeooo:rsid="006114eb"/>
    </style:style>
    <style:style style:name="T46" style:family="text">
      <style:text-properties officeooo:rsid="005ff13b"/>
    </style:style>
    <style:style style:name="T47" style:family="text">
      <style:text-properties fo:font-style="italic" officeooo:rsid="00365aca" style:font-style-asian="italic" style:font-style-complex="italic"/>
    </style:style>
    <style:style style:name="T48" style:family="text">
      <style:text-properties fo:font-style="normal" officeooo:rsid="00365aca" style:font-style-asian="normal" style:font-style-complex="normal"/>
    </style:style>
    <style:style style:name="T49" style:family="text">
      <style:text-properties fo:font-style="normal" officeooo:rsid="0067430e" style:font-style-asian="normal" style:font-style-complex="normal"/>
    </style:style>
    <style:style style:name="T50" style:family="text">
      <style:text-properties officeooo:rsid="0072e1e3"/>
    </style:style>
    <style:style style:name="T51" style:family="text">
      <style:text-properties officeooo:rsid="00b07db7"/>
    </style:style>
    <style:style style:name="T52" style:family="text">
      <style:text-properties fo:font-style="italic" officeooo:rsid="00b07db7" style:font-style-asian="italic" style:font-style-complex="italic"/>
    </style:style>
    <style:style style:name="T53" style:family="text">
      <style:text-properties officeooo:rsid="00378105"/>
    </style:style>
    <style:style style:name="T54" style:family="text">
      <style:text-properties officeooo:rsid="00b5339a"/>
    </style:style>
    <style:style style:name="T55" style:family="text">
      <style:text-properties fo:font-style="italic" officeooo:rsid="004a5797" style:font-style-asian="italic" style:font-style-complex="italic"/>
    </style:style>
    <style:style style:name="T56" style:family="text">
      <style:text-properties officeooo:rsid="00c0dec6"/>
    </style:style>
    <style:style style:name="T57" style:family="text">
      <style:text-properties officeooo:rsid="0054af9c"/>
    </style:style>
    <style:style style:name="T58" style:family="text">
      <style:text-properties officeooo:rsid="00717095"/>
    </style:style>
    <style:style style:name="T59" style:family="text">
      <style:text-properties fo:font-style="italic" officeooo:rsid="00717095" style:font-style-asian="italic" style:font-style-complex="italic"/>
    </style:style>
    <style:style style:name="T60" style:family="text">
      <style:text-properties fo:font-style="normal" officeooo:rsid="00717095" style:font-style-asian="normal" style:font-style-complex="normal"/>
    </style:style>
    <style:style style:name="T61" style:family="text">
      <style:text-properties fo:font-style="normal" officeooo:rsid="00729ed3" style:font-style-asian="normal" style:font-style-complex="normal"/>
    </style:style>
    <style:style style:name="T62" style:family="text">
      <style:text-properties fo:font-style="normal" officeooo:rsid="0074287e" style:font-style-asian="normal" style:font-style-complex="normal"/>
    </style:style>
    <style:style style:name="T63" style:family="text">
      <style:text-properties fo:font-style="normal" officeooo:rsid="00c3068c" style:font-style-asian="normal" style:font-style-complex="normal"/>
    </style:style>
    <style:style style:name="T64" style:family="text">
      <style:text-properties officeooo:rsid="0075a221"/>
    </style:style>
    <style:style style:name="T65" style:family="text">
      <style:text-properties officeooo:rsid="007c1786"/>
    </style:style>
    <style:style style:name="T66" style:family="text">
      <style:text-properties officeooo:rsid="007a2624"/>
    </style:style>
    <style:style style:name="T67" style:family="text">
      <style:text-properties officeooo:rsid="007e3fe2"/>
    </style:style>
    <style:style style:name="T68" style:family="text">
      <style:text-properties fo:color="#127622" loext:opacity="100%"/>
    </style:style>
    <style:style style:name="T69" style:family="text">
      <style:text-properties officeooo:rsid="00c9d466"/>
    </style:style>
    <style:style style:name="T70" style:family="text">
      <style:text-properties officeooo:rsid="0089a2e6"/>
    </style:style>
    <style:style style:name="T71" style:family="text">
      <style:text-properties officeooo:rsid="00838b73"/>
    </style:style>
    <style:style style:name="T72" style:family="text">
      <style:text-properties officeooo:rsid="0084849d"/>
    </style:style>
    <style:style style:name="T73" style:family="text">
      <style:text-properties officeooo:rsid="00cc46d6"/>
    </style:style>
    <style:style style:name="T74" style:family="text">
      <style:text-properties officeooo:rsid="00ccbe67"/>
    </style:style>
    <style:style style:name="T75" style:family="text">
      <style:text-properties fo:font-weight="bold" officeooo:rsid="00cc46d6" style:font-weight-asian="bold" style:font-weight-complex="bold"/>
    </style:style>
    <style:style style:name="T76" style:family="text">
      <style:text-properties fo:color="#ff0000" loext:opacity="100%"/>
    </style:style>
    <style:style style:name="T77" style:family="text">
      <style:text-properties fo:color="#ff0000" loext:opacity="100%" fo:background-color="#ffff00" loext:char-shading-value="0"/>
    </style:style>
    <style:style style:name="T78" style:family="text">
      <style:text-properties style:font-name="Liberation Sans" fo:font-size="12pt" fo:font-style="normal" officeooo:rsid="00db0adf" style:font-size-asian="12pt" style:font-style-asian="normal" style:font-size-complex="12pt" style:font-style-complex="normal"/>
    </style:style>
    <style:style style:name="T79" style:family="text">
      <style:text-properties style:font-name="Liberation Sans" fo:font-size="12pt" fo:font-style="normal" fo:font-weight="bold" officeooo:rsid="00db0adf" style:font-size-asian="12pt" style:font-style-asian="normal" style:font-weight-asian="bold" style:font-size-complex="12pt" style:font-style-complex="normal" style:font-weight-complex="bold"/>
    </style:style>
    <style:style style:name="T80" style:family="text">
      <style:text-properties style:font-name="Liberation Sans" fo:font-size="12pt" fo:font-style="normal" fo:font-weight="normal" officeooo:rsid="00db0adf" style:font-size-asian="12pt" style:font-style-asian="normal" style:font-weight-asian="normal" style:font-size-complex="12pt" style:font-style-complex="normal" style:font-weight-complex="normal"/>
    </style:style>
    <style:style style:name="T81" style:family="text">
      <style:text-properties style:font-name="Liberation Sans" fo:font-size="12pt" fo:font-style="normal" fo:font-weight="normal" officeooo:rsid="00df5abe" style:font-size-asian="12pt" style:font-style-asian="normal" style:font-weight-asian="normal" style:font-size-complex="12pt" style:font-style-complex="normal" style:font-weight-complex="normal"/>
    </style:style>
    <style:style style:name="T82" style:family="text">
      <style:text-properties style:font-name="Liberation Sans" fo:font-size="12pt" fo:font-style="normal" fo:font-weight="bold" officeooo:rsid="00df5abe" style:font-size-asian="12pt" style:font-style-asian="normal" style:font-weight-asian="bold" style:font-size-complex="12pt" style:font-style-complex="normal" style:font-weight-complex="bold"/>
    </style:style>
    <style:style style:name="T83" style:family="text">
      <style:text-properties style:font-name="Liberation Sans" fo:font-size="12pt" fo:font-style="normal" fo:font-weight="normal" officeooo:rsid="00e3a0f3" style:font-size-asian="12pt" style:font-style-asian="normal" style:font-weight-asian="normal" style:font-size-complex="12pt" style:font-style-complex="normal" style:font-weight-complex="normal"/>
    </style:style>
    <style:style style:name="T84" style:family="text">
      <style:text-properties style:font-name="Liberation Sans" fo:font-size="12pt" fo:font-style="normal" fo:font-weight="normal" officeooo:rsid="00e721de" style:font-size-asian="12pt" style:font-style-asian="normal" style:font-weight-asian="normal" style:font-size-complex="12pt" style:font-style-complex="normal" style:font-weight-complex="normal"/>
    </style:style>
    <style:style style:name="T85" style:family="text">
      <style:text-properties style:font-name="Liberation Sans" fo:font-size="12pt" fo:font-style="normal" officeooo:rsid="00e59e3a" style:font-size-asian="12pt" style:font-style-asian="normal" style:font-size-complex="12pt" style:font-style-complex="normal"/>
    </style:style>
    <style:style style:name="T86" style:family="text">
      <style:text-properties style:font-name="Liberation Sans" fo:font-size="12pt" fo:font-style="normal" fo:font-weight="bold" officeooo:rsid="00e59e3a" style:font-size-asian="12pt" style:font-style-asian="normal" style:font-weight-asian="bold" style:font-size-complex="12pt" style:font-style-complex="normal" style:font-weight-complex="bold"/>
    </style:style>
    <style:style style:name="T87" style:family="text">
      <style:text-properties style:font-name="Liberation Sans" fo:font-size="12pt" fo:font-style="normal" officeooo:rsid="00e885f9" style:font-size-asian="12pt" style:font-style-asian="normal" style:font-size-complex="12pt" style:font-style-complex="normal"/>
    </style:style>
    <style:style style:name="T88" style:family="text">
      <style:text-properties style:font-name="Liberation Sans" fo:font-size="12pt" fo:font-style="normal" officeooo:rsid="00ef4217" style:font-size-asian="12pt" style:font-style-asian="normal" style:font-size-complex="12pt" style:font-style-complex="normal"/>
    </style:style>
    <style:style style:name="T89" style:family="text">
      <style:text-properties style:font-name="Liberation Sans" fo:font-size="12pt" fo:font-style="normal" fo:font-weight="bold" officeooo:rsid="00e885f9" style:font-size-asian="12pt" style:font-style-asian="normal" style:font-weight-asian="bold" style:font-size-complex="12pt" style:font-style-complex="normal" style:font-weight-complex="bold"/>
    </style:style>
    <style:style style:name="T90" style:family="text">
      <style:text-properties officeooo:rsid="00f36f65"/>
    </style:style>
    <style:style style:name="T91" style:family="text">
      <style:text-properties fo:font-style="italic" officeooo:rsid="00f36f65" style:font-style-asian="italic" style:font-style-complex="italic"/>
    </style:style>
    <style:style style:name="T92" style:family="text">
      <style:text-properties fo:color="#127622" loext:opacity="100%" officeooo:rsid="00f36f65"/>
    </style:style>
    <style:style style:name="T93" style:family="text">
      <style:text-properties fo:font-weight="bold" officeooo:rsid="00f36f65" style:font-weight-asian="bold" style:font-weight-complex="bold"/>
    </style:style>
    <style:style style:name="T94" style:family="text">
      <style:text-properties officeooo:rsid="006114eb"/>
    </style:style>
    <style:style style:name="T95" style:family="text">
      <style:text-properties officeooo:rsid="0061526c"/>
    </style:style>
    <style:style style:name="T96" style:family="text">
      <style:text-properties officeooo:rsid="0064f8c7"/>
    </style:style>
    <style:style style:name="T97" style:family="text">
      <style:text-properties fo:font-weight="bold" officeooo:rsid="006114eb" style:font-weight-asian="bold" style:font-weight-complex="bold"/>
    </style:style>
    <style:style style:name="T98" style:family="text">
      <style:text-properties fo:font-weight="bold" officeooo:rsid="00626190" style:font-weight-asian="bold" style:font-weight-complex="bold"/>
    </style:style>
    <style:style style:name="T99" style:family="text">
      <style:text-properties officeooo:rsid="00626190"/>
    </style:style>
    <style:style style:name="T100" style:family="text">
      <style:text-properties officeooo:rsid="0068aaeb"/>
    </style:style>
    <style:style style:name="T101" style:family="text">
      <style:text-properties fo:font-weight="bold" officeooo:rsid="0061526c" style:font-weight-asian="bold" style:font-weight-complex="bold"/>
    </style:style>
    <style:style style:name="T102" style:family="text">
      <style:text-properties officeooo:rsid="0063fb22"/>
    </style:style>
    <style:style style:name="T103" style:family="text">
      <style:text-properties officeooo:rsid="0069919f"/>
    </style:style>
    <style:style style:name="T104" style:family="text">
      <style:text-properties officeooo:rsid="00b8da57"/>
    </style:style>
    <style:style style:name="T105" style:family="text">
      <style:text-properties officeooo:rsid="00b9412b"/>
    </style:style>
    <style:style style:name="T106" style:family="text">
      <style:text-properties officeooo:rsid="00bb02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756in" fo:text-indent="-0.25in" fo:margin-left="0.675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56in" fo:text-indent="-0.25in" fo:margin-left="0.925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56in" fo:text-indent="-0.25in" fo:margin-left="1.175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56in" fo:text-indent="-0.25in" fo:margin-left="1.425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56in" fo:text-indent="-0.25in" fo:margin-left="1.675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56in" fo:text-indent="-0.25in" fo:margin-left="1.925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56in" fo:text-indent="-0.25in" fo:margin-left="2.175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56in" fo:text-indent="-0.25in" fo:margin-left="2.425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56in" fo:text-indent="-0.25in" fo:margin-left="2.675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56in" fo:text-indent="-0.25in" fo:margin-left="2.9256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harmacists</text:span> &amp; Sorcerers</text:p>
      <text:p text:style-name="P2">they have more in common than you want to believe</text:p>
      <text:p text:style-name="Standard"/>
      <text:p text:style-name="P3">Where the English word Pharmacy comes from is really quite simple. But, what’s more fascinating is how the root from Ancient Greek is used in Scripture <text:span text:style-name="T2">and how it is directly linked both </text:span><text:span text:style-name="T3">linguistically</text:span><text:span text:style-name="T2"> (where the word came from and how it’s used) and </text:span><text:span text:style-name="T3">practically</text:span><text:span text:style-name="T2"> (what the people do that it describes and the products </text:span><text:span text:style-name="T4">they produce</text:span><text:span text:style-name="T2">) </text:span><text:span text:style-name="T5">to things we see today (</text:span><text:span text:style-name="T6">Ecc 1:9</text:span><text:span text:style-name="T5">).</text:span></text:p>
      <text:p text:style-name="P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text:span text:style-name="Strong_20_Emphasis"><text:span text:style-name="T7">Historical Stage</text:span></text:span></text:p>
            </table:table-cell>
            <table:table-cell table:style-name="Table1.A1" office:value-type="string">
              <text:p text:style-name="P5"><text:span text:style-name="Strong_20_Emphasis"><text:span text:style-name="T7">Word</text:span></text:span></text:p>
            </table:table-cell>
            <table:table-cell table:style-name="Table1.C1" office:value-type="string">
              <text:p text:style-name="P5"><text:span text:style-name="Strong_20_Emphasis"><text:span text:style-name="T7">Language Type</text:span></text:span></text:p>
            </table:table-cell>
          </table:table-row>
        </table:table-header-rows>
        <table:table-row>
          <table:table-cell table:style-name="Table1.A2" office:value-type="string">
            <text:p text:style-name="P6">Original Root</text:p>
          </table:table-cell>
          <table:table-cell table:style-name="Table1.A2" office:value-type="string">
            <text:p text:style-name="P7">φαρμακεία (<text:span text:style-name="T8">pharmakeia</text:span>)</text:p>
          </table:table-cell>
          <table:table-cell table:style-name="Table1.C2" office:value-type="string">
            <text:p text:style-name="P7">Ancient Greek</text:p>
          </table:table-cell>
        </table:table-row>
        <table:table-row>
          <table:table-cell table:style-name="Table1.A2" office:value-type="string">
            <text:p text:style-name="P6">Direct Ancestor</text:p>
          </table:table-cell>
          <table:table-cell table:style-name="Table1.A2" office:value-type="string">
            <text:p text:style-name="P8">pharmacia</text:p>
          </table:table-cell>
          <table:table-cell table:style-name="Table1.C2" office:value-type="string">
            <text:p text:style-name="P7">Late / Medieval Latin</text:p>
          </table:table-cell>
        </table:table-row>
        <table:table-row>
          <table:table-cell table:style-name="Table1.A2" office:value-type="string">
            <text:p text:style-name="P6">Middle Step</text:p>
          </table:table-cell>
          <table:table-cell table:style-name="Table1.A2" office:value-type="string">
            <text:p text:style-name="P8">farmacie</text:p>
          </table:table-cell>
          <table:table-cell table:style-name="Table1.C2" office:value-type="string">
            <text:p text:style-name="P7">Old / Middle French</text:p>
          </table:table-cell>
        </table:table-row>
        <table:table-row>
          <table:table-cell table:style-name="Table1.A2" office:value-type="string">
            <text:p text:style-name="P6">Modern Word</text:p>
          </table:table-cell>
          <table:table-cell table:style-name="Table1.A2" office:value-type="string">
            <text:p text:style-name="P8">Pharmacy</text:p>
          </table:table-cell>
          <table:table-cell table:style-name="Table1.C2" office:value-type="string">
            <text:p text:style-name="P7">Modern English</text:p>
          </table:table-cell>
        </table:table-row>
      </table:table>
      <text:p text:style-name="P9"/>
      <text:p text:style-name="P10">Strong’s numbers connected to Pharmacy <text:span text:style-name="T9">through the Greek root</text:span><text:span text:style-name="T10">*</text:span>:</text:p>
      <text:p text:style-name="P10"/>
      <table:table table:name="Table2" table:style-name="Table2">
        <table:table-column table:style-name="Table2.A"/>
        <table:table-column table:style-name="Table2.B"/>
        <table:table-row>
          <table:table-cell table:style-name="Table2.A1" office:value-type="string">
            <text:p text:style-name="Table_20_Contents">G5331</text:p>
            <text:p text:style-name="Table_20_Contents">(<text:span text:style-name="T11">pharmakeia</text:span>)</text:p>
            <text:p text:style-name="Table_20_Contents">(derived from G5332)</text:p>
          </table:table-cell>
          <table:table-cell table:style-name="Table2.B1" office:value-type="string">
            <text:p text:style-name="P11">Gal 5:20</text:p>
            <text:p text:style-name="P12">Idolatry, <text:span text:style-name="T12">witchcraft</text:span><text:span text:style-name="T13">G5331</text:span>, hatred, variance, emulations, wrath, strife, seditions, heresies,</text:p>
            <text:p text:style-name="P12"/>
            <text:p text:style-name="P11">Rev 9:21</text:p>
            <text:p text:style-name="P12">Neither repented they of their murders, nor of their <text:span text:style-name="T12">sorceries</text:span><text:span text:style-name="T13">G5331</text:span>, nor of their fornication, nor of their thefts.</text:p>
            <text:p text:style-name="P12"/>
            <text:p text:style-name="P11">Rev 18:23</text:p>
            <text:p text:style-name="P12">And the light of a candle shall shine no more at all in thee; and the voice of the bridegroom and of the bride shall be heard no more at all in thee: for thy merchants were the great men of the earth; for by thy <text:span text:style-name="T12">sorceries</text:span><text:span text:style-name="T13">G5331</text:span> were all nations deceived.</text:p>
          </table:table-cell>
        </table:table-row>
        <table:table-row>
          <table:table-cell table:style-name="Table2.A2" office:value-type="string">
            <text:p text:style-name="P13">G5332</text:p>
            <text:p text:style-name="Table_20_Contents">(pharmakeus)</text:p>
          </table:table-cell>
          <table:table-cell table:style-name="Table2.B2" office:value-type="string">
            <text:p text:style-name="P14">Rev 21:8</text:p>
            <text:p text:style-name="P15">But the fearful, and unbelieving, and the abominable, and murderers, and whoremongers, and <text:span text:style-name="T12">sorcerers</text:span><text:span text:style-name="T13">G5332</text:span>, and idolaters, and all liars, shall have their part in the lake which burneth with fire and brimstone: which is the second death.</text:p>
          </table:table-cell>
        </table:table-row>
        <table:table-row>
          <table:table-cell table:style-name="Table2.A2" office:value-type="string">
            <text:p text:style-name="P13">G5333</text:p>
            <text:p text:style-name="P16">(pharmakos)</text:p>
          </table:table-cell>
          <table:table-cell table:style-name="Table2.B3" office:value-type="string">
            <text:p text:style-name="P17">Rev 22:15</text:p>
            <text:p text:style-name="P18">For without are dogs, and <text:span text:style-name="T12">sorcerers</text:span><text:span text:style-name="T13">G5333</text:span>, and whoremongers, and murderers, and idolaters, and whosoever loveth and maketh a lie.</text:p>
          </table:table-cell>
        </table:table-row>
      </table:table>
      <text:p text:style-name="P19"/>
      <text:p text:style-name="P20"><text:span text:style-name="T14">Even if there </text:span><text:span text:style-name="T15">was</text:span><text:span text:style-name="T14"> no practical connection, who wants to be </text:span><text:span text:style-name="T16">linguistically </text:span><text:span text:style-name="T14">associated with Sorcerers and Witches? </text:span><text:span text:style-name="T17">That’s the </text:span><text:span text:style-name="T18">very essence of the </text:span><text:span text:style-name="T17">error of Balaam (</text:span><text:span text:style-name="T19">mixing</text:span><text:span text:style-name="T17"> godliness with worldliness). </text:span><text:span text:style-name="T20">He tried to have one foot in each world and where did that get him (</text:span><text:span text:style-name="T21">Jos 13:22</text:span>; and an example of what <text:span text:style-name="T11">not</text:span> to do<text:span text:style-name="T20">)? </text:span><text:span text:style-name="T19">God demands holiness </text:span><text:span text:style-name="T22">(</text:span><text:span text:style-name="T23">1Pet 1:15,16</text:span><text:span text:style-name="T22">) </text:span><text:span text:style-name="T24">and will have none of th</text:span><text:span text:style-name="T25">e idolatry of </text:span><text:span text:style-name="T26">pharmakeis</text:span> (plural of <text:span text:style-name="T27">pharmakeus</text:span>).</text:p>
      <text:p text:style-name="P20"/>
      <text:p text:style-name="P20"/>
      <text:p text:style-name="P20"/>
      <text:p text:style-name="P20"/>
      <text:p text:style-name="P20"/>
      <text:p text:style-name="P20"/>
      <text:p text:style-name="P20"/>
      <table:table table:name="Table4" table:style-name="Table4">
        <table:table-column table:style-name="Table4.A"/>
        <table:table-column table:style-name="Table4.B"/>
        <table:table-column table:style-name="Table4.C"/>
        <table:table-header-rows>
          <text:soft-page-break/>
          <table:table-row>
            <table:table-cell table:style-name="Table4.A1" table:number-columns-spanned="3" office:value-type="string">
              <text:p text:style-name="P21">Summary of cultural usage</text:p>
            </table:table-cell>
            <table:covered-table-cell/>
            <table:covered-table-cell/>
          </table:table-row>
        </table:table-header-rows>
        <table:table-row>
          <table:table-cell table:style-name="Table4.A2" office:value-type="string">
            <text:p text:style-name="P22"><text:span text:style-name="Strong_20_Emphasis"><text:span text:style-name="T28">Strong's Number</text:span></text:span></text:p>
          </table:table-cell>
          <table:table-cell table:style-name="Table4.A2" office:value-type="string">
            <text:p text:style-name="P22"><text:span text:style-name="Strong_20_Emphasis"><text:span text:style-name="T28">Greek Word</text:span></text:span></text:p>
          </table:table-cell>
          <table:table-cell table:style-name="Table4.C2" office:value-type="string">
            <text:p text:style-name="P22"><text:span text:style-name="Strong_20_Emphasis"><text:span text:style-name="T28">Cultural Function &amp; Usage</text:span></text:span></text:p>
          </table:table-cell>
        </table:table-row>
        <table:table-row>
          <table:table-cell table:style-name="Table4.A2" office:value-type="string">
            <text:p text:style-name="P23">G5331</text:p>
          </table:table-cell>
          <table:table-cell table:style-name="Table4.A2" office:value-type="string">
            <text:p text:style-name="P24">pharmakeia</text:p>
          </table:table-cell>
          <table:table-cell table:style-name="Table4.C2" office:value-type="string">
            <text:p text:style-name="P25">The <text:span text:style-name="T29">act</text:span> of administering potions, ranging from legitimate medical purging to illegal poisoning and occult spell-casting.</text:p>
          </table:table-cell>
        </table:table-row>
        <table:table-row>
          <table:table-cell table:style-name="Table4.A2" office:value-type="string">
            <text:p text:style-name="P23">G5332</text:p>
          </table:table-cell>
          <table:table-cell table:style-name="Table4.A2" office:value-type="string">
            <text:p text:style-name="P24">pharmakeus</text:p>
          </table:table-cell>
          <table:table-cell table:style-name="Table4.C2" office:value-type="string">
            <text:p text:style-name="P25">The <text:span text:style-name="T29">artisan/mixer</text:span> who physically understands how to extract, boil, and compound potent substances for drugs or magic.</text:p>
          </table:table-cell>
        </table:table-row>
        <table:table-row>
          <table:table-cell table:style-name="Table4.A2" office:value-type="string">
            <text:p text:style-name="P23">G5333</text:p>
          </table:table-cell>
          <table:table-cell table:style-name="Table4.A2" office:value-type="string">
            <text:p text:style-name="P24">pharmakos</text:p>
          </table:table-cell>
          <table:table-cell table:style-name="Table4.C2" office:value-type="string">
            <text:p text:style-name="P25">The <text:span text:style-name="T29">sorcerer</text:span> or <text:span text:style-name="T29">scapegoat</text:span>; an individual spiritually marked by the deceptive, corrupting use of occult arts and illicit substances.</text:p>
          </table:table-cell>
        </table:table-row>
      </table:table>
      <text:p text:style-name="P26"/>
      <text:p text:style-name="P27"><text:span text:style-name="T30">C</text:span><text:span text:style-name="T31">ommon/</text:span><text:span text:style-name="T30">cultural</text:span><text:span text:style-name="T31"> usage</text:span></text:p>
      <text:p text:style-name="Standard"/>
      <text:p text:style-name="P28"><text:span text:style-name="T32">Those three</text:span> Greek <text:span text:style-name="T33">roots</text:span><text:span text:style-name="T34">*</text:span><text:span text:style-name="T33"> used in scripture </text:span>are <text:span text:style-name="T35">built upon the word</text:span> φάρμακον (pharmakon). <text:span text:style-name="T36">To the ancient Greek mind a </text:span><text:span text:style-name="T37">pharmakon</text:span><text:span text:style-name="T38"> was simply “a potent substance capable of altering the physical or mental state”. </text:span><text:span text:style-name="T39">It </text:span><text:span text:style-name="T40">is</text:span><text:span text:style-name="T39"> neutral on its own and could either heal or kill.</text:span><text:span text:style-name="T41"> </text:span><text:span text:style-name="T42">In order to form the </text:span><text:span text:style-name="T43">three</text:span><text:span text:style-name="T42"> </text:span><text:span text:style-name="T44">root </text:span><text:span text:style-name="T42">words</text:span><text:span text:style-name="T45">*</text:span><text:span text:style-name="T42"> above </text:span><text:span text:style-name="T46">that </text:span><text:span text:style-name="T42">we see in the Bible, </text:span><text:span text:style-name="T47">pharmakon</text:span><text:span text:style-name="T48"> had suffixes added to it that each add their own nuance</text:span><text:span text:style-name="T49">s.</text:span></text:p>
      <text:p text:style-name="P29"/>
      <text:p text:style-name="P29"><text:span text:style-name="T11">φαρμακεία</text:span> (pharmakeia)</text:p>
      <text:list text:style-name="L1">
        <text:list-item>
          <text:p text:style-name="P30">The suffix -eia denotes an action, activity, or <text:span text:style-name="T50">the</text:span> business/practice.</text:p>
        </text:list-item>
        <text:list-item>
          <text:p text:style-name="P30">In common civic life it meant “the administration or employment of drugs and potions”.</text:p>
          <text:list>
            <text:list-item>
              <text:p text:style-name="P31">Medicinal application</text:p>
            </text:list-item>
            <text:list-item>
              <text:p text:style-name="P31">Poisoning</text:p>
            </text:list-item>
            <text:list-item>
              <text:p text:style-name="P31">Spiritual/occult manipulation</text:p>
              <text:list>
                <text:list-item>
                  <text:p text:style-name="P31">The word became synonymous with casting spells and trafficking with spirits <text:span text:style-name="T51">(</text:span><text:span text:style-name="T52">familiar spirits</text:span><text:span text:style-name="T51">)</text:span>.</text:p>
                </text:list-item>
              </text:list>
            </text:list-item>
          </text:list>
        </text:list-item>
      </text:list>
      <text:p text:style-name="P29"/>
      <text:p text:style-name="P29"><text:span text:style-name="T11">φαρμακεύς</text:span> <text:span text:style-name="T53">(pharmakeus)</text:span></text:p>
      <text:list text:style-name="L2">
        <text:list-item>
          <text:p text:style-name="P32">The suffix -eus denotes a specific agent, trade practitioner, or craftsman (like a silversmith or a blacksmith).</text:p>
        </text:list-item>
        <text:list-item>
          <text:p text:style-name="P33">In common usage it meant “the person who physically compounded and mixed the potions”.</text:p>
        </text:list-item>
        <text:list-item>
          <text:p text:style-name="P33">If you went into an ancient marketplace, this person was essentially a "druggist" or an "apothecary." However, because there was no strict division between science and the supernatural back then, a <text:span text:style-name="T27">pharmakeus</text:span> wasn't just a pharmacist in the modern sense. They were often viewed with a degree of suspicion - someone who knew how to boil down roots to make a fever go away but who also knew how to mix a deadly odorless poison, create a "love potion," or brew a narcotic drink for a pagan ritual.</text:p>
        </text:list-item>
      </text:list>
      <text:p text:style-name="P29"/>
      <text:p text:style-name="P29"><text:span text:style-name="T11">φάρμακος</text:span> <text:span text:style-name="T53">(pharmakos)</text:span></text:p>
      <text:list text:style-name="L3">
        <text:list-item>
          <text:p text:style-name="P34">The suffix -os <text:span text:style-name="T54">turns</text:span> <text:span text:style-name="T27">pharmakon</text:span> into an adjective denoting something "devoted to" or "belonging to" the drug/potion craft, used as a masculine noun.</text:p>
        </text:list-item>
        <text:list-item>
          <text:p text:style-name="P35">Used more broadly to describe “the practitioner of the dark/magical side of the craft”.</text:p>
        </text:list-item>
        <text:list-item>
          <text:p text:style-name="P35"><text:span text:style-name="T55">P</text:span><text:span text:style-name="T27">harmakos</text:span> carries a very dark, specific cultural history in classical Greek. In ancient Athens and Marseilles during times of plague or famine, the city would select an outcast, a criminal, or a physically deformed person. This person was called the <text:span text:style-name="T27">pharmakos</text:span>. They were fed at public expense, paraded through the city to “absorb” its spiritual pollution, and then cast out of the city or executed as a human scapegoat to "purge" the community. Therefore, to a native Greek ear, <text:span text:style-name="T27">pharmakos</text:span> always carried an underlying connotation of spiritual filth, an outcast, or a malicious worker of dark/corrupting arts.</text:p>
        </text:list-item>
      </text:list>
      <text:p text:style-name="P29"/>
      <text:p text:style-name="P29"/>
      <text:p text:style-name="P36"><text:soft-page-break/>We can use the English to <text:span text:style-name="T56">easily </text:span>bridge between the NT and the OT.</text:p>
      <text:p text:style-name="P29"/>
      <table:table table:name="Table3" table:style-name="Table3">
        <table:table-column table:style-name="Table3.A"/>
        <table:table-column table:style-name="Table3.B"/>
        <table:table-row>
          <table:table-cell table:style-name="Table3.A1" office:value-type="string">
            <text:p text:style-name="P37">H3784</text:p>
          </table:table-cell>
          <table:table-cell table:style-name="Table3.B1" office:value-type="string">
            <text:p text:style-name="P38">Exo 7:11</text:p>
            <text:p text:style-name="P39">Then Pharaoh also called the wise men and the <text:span text:style-name="T12">sorcerers</text:span><text:span text:style-name="T13">H3784</text:span>: now the magicians of Egypt, they also did in like manner with their enchantments.</text:p>
            <text:p text:style-name="P39"/>
            <text:p text:style-name="P38">Exo 22:18</text:p>
            <text:p text:style-name="P39">Thou shalt not suffer a <text:span text:style-name="T12">witch</text:span><text:span text:style-name="T13">H3784</text:span> to live.</text:p>
            <text:p text:style-name="P39"/>
            <text:p text:style-name="P38">Deu 18:10</text:p>
            <text:p text:style-name="P39">There shall not be found among you any one that maketh his son or his daughter to pass through the fire, or that useth divination, or an observer of times, or an enchanter, or a <text:span text:style-name="T12">witch</text:span><text:span text:style-name="T13">H3784</text:span>,</text:p>
            <text:p text:style-name="P39"/>
            <text:p text:style-name="P38">2Ch 33:6</text:p>
            <text:p text:style-name="P39">And he caused his children to pass through the fire in the valley of the son of Hinnom: also he observed times, and used enchantments, and used <text:span text:style-name="T12">witchcraft</text:span><text:span text:style-name="T13">H3784</text:span>, and dealt with a familiar spirit, and with wizards: he wrought much evil in the sight of the LORD, to provoke him to anger.</text:p>
            <text:p text:style-name="P39"/>
            <text:p text:style-name="P38">Dan 2:2</text:p>
            <text:p text:style-name="P39">Then the king commanded to call the magicians, and the astrologers, and the <text:span text:style-name="T12">sorcerers</text:span><text:span text:style-name="T13">H3784</text:span>, and the Chaldeans, for to shew the king his dreams. So they came and stood before the king.</text:p>
            <text:p text:style-name="P39"/>
            <text:p text:style-name="P38">Mal 3:5</text:p>
            <text:p text:style-name="P39">And I will come near to you to judgment; and I will be a swift witness against the <text:span text:style-name="T12">sorcerers</text:span><text:span text:style-name="T13">H3784</text:span>, and against the adulterers, and against false swearers, and against those that oppress the hireling in his wages, the widow, and the fatherless, and that turn aside the stranger from his right, and fear not me, saith the LORD of hosts.</text:p>
          </table:table-cell>
        </table:table-row>
        <table:table-row>
          <table:table-cell table:style-name="Table3.A2" office:value-type="string">
            <text:p text:style-name="P40">H3785</text:p>
          </table:table-cell>
          <table:table-cell table:style-name="Table3.B2" office:value-type="string">
            <text:p text:style-name="P41">2Ki 9:22</text:p>
            <text:p text:style-name="P42">And it came to pass, when Joram saw Jehu, that he said, Is it peace, Jehu? And he answered, What peace, so long as the whoredoms of thy mother Jezebel and her <text:span text:style-name="T12">witchcrafts</text:span><text:span text:style-name="T13">H3785</text:span> are so many?</text:p>
            <text:p text:style-name="P42"/>
            <text:p text:style-name="P41">Isa 47:9</text:p>
            <text:p text:style-name="P42">But these two things shall come to thee in a moment in one day, the loss of children, and widowhood: they shall come upon thee in their perfection for the multitude of thy <text:span text:style-name="T12">sorceries</text:span><text:span text:style-name="T13">H3785</text:span>, and for the great abundance of thine enchantments.</text:p>
            <text:p text:style-name="P43"/>
            <text:p text:style-name="P41">Isa 47:12</text:p>
            <text:p text:style-name="P42">Stand now with thine enchantments, and with the multitude of thy <text:span text:style-name="T12">sorceries</text:span><text:span text:style-name="T13">H3785</text:span>, wherein thou hast laboured from thy youth; if so be thou shalt be able to profit, if so be thou mayest prevail.</text:p>
            <text:p text:style-name="P42"/>
            <text:p text:style-name="P41">Mic 5:12</text:p>
            <text:p text:style-name="P42">And I will cut off <text:span text:style-name="T12">witchcrafts</text:span><text:span text:style-name="T13">H3785</text:span> out of thine hand; and thou shalt have no more soothsayers:</text:p>
            <text:p text:style-name="P43"/>
            <text:p text:style-name="P41">Nah 3:4</text:p>
            <text:p text:style-name="P42">Because of the multitude of the whoredoms of the wellfavoured harlot, the mistress of <text:span text:style-name="T12">witchcrafts</text:span><text:span text:style-name="T13">H3785</text:span>, that selleth nations through her whoredoms, and families through her <text:span text:style-name="T12">witchcrafts</text:span><text:span text:style-name="T13">H3785</text:span>.</text:p>
          </table:table-cell>
        </table:table-row>
        <table:table-row>
          <table:table-cell table:style-name="Table3.A2" office:value-type="string">
            <text:p text:style-name="P44">H3786</text:p>
          </table:table-cell>
          <table:table-cell table:style-name="Table3.B3" office:value-type="string">
            <text:p text:style-name="P45">Jer 27:9</text:p>
            <text:p text:style-name="P46"><text:span text:style-name="T57">T</text:span>herefore hearken not ye to your prophets, nor to your diviners, nor to your dreamers, nor to your enchanters, nor to your <text:span text:style-name="T12">sorcerers</text:span><text:span text:style-name="T13">H3786</text:span>, which speak unto you, saying, Ye shall not serve the king of Babylon:</text:p>
          </table:table-cell>
        </table:table-row>
      </table:table>
      <text:p text:style-name="P47"><text:soft-page-break/>Knowing all of this it becomes undeniable that through not only the linguistic etymology but also the <text:span text:style-name="T58">evolution of the</text:span> common, cultural uses of the variations of <text:span text:style-name="T27">pharmako</text:span><text:span text:style-name="T59">n</text:span><text:span text:style-name="T60"> </text:span><text:span text:style-name="T61">there are direct links to </text:span><text:span text:style-name="T62">both </text:span><text:span text:style-name="T63">the </text:span><text:span text:style-name="T61">words and practices we still see today:</text:span></text:p>
      <text:p text:style-name="P48"/>
      <table:table table:name="Table5" table:style-name="Table5">
        <table:table-column table:style-name="Table5.A"/>
        <table:table-column table:style-name="Table5.B"/>
        <table:table-row>
          <table:table-cell table:style-name="Table5.A1" office:value-type="string">
            <text:p text:style-name="P49">Modern equivalent</text:p>
          </table:table-cell>
          <table:table-cell table:style-name="Table5.B1" office:value-type="string">
            <text:p text:style-name="P49">Greek word</text:p>
          </table:table-cell>
        </table:table-row>
        <table:table-row>
          <table:table-cell table:style-name="Table5.A2" office:value-type="string">
            <text:p text:style-name="P50">Pharmacies</text:p>
            <text:p text:style-name="P51">(the place where drugs are trafficked)</text:p>
          </table:table-cell>
          <table:table-cell table:style-name="Table5.B2" office:value-type="string">
            <text:p text:style-name="P52">G5331</text:p>
            <text:p text:style-name="P52">φαρμακεία</text:p>
            <text:p text:style-name="P52">(pharmakeia)</text:p>
          </table:table-cell>
        </table:table-row>
        <table:table-row>
          <table:table-cell table:style-name="Table5.A2" office:value-type="string">
            <text:p text:style-name="P50">Pharmaceuticals</text:p>
            <text:p text:style-name="P51">(the drugs themselves)</text:p>
          </table:table-cell>
          <table:table-cell table:style-name="Table5.B2" office:value-type="string">
            <text:p text:style-name="P52">Φάρμακον</text:p>
            <text:p text:style-name="P52">(pharmakon/<text:span text:style-name="T64">pharmaka</text:span>)</text:p>
          </table:table-cell>
        </table:table-row>
        <table:table-row table:style-name="Table5.4">
          <table:table-cell table:style-name="Table5.A2" office:value-type="string">
            <text:p text:style-name="P53">Pharmacist</text:p>
            <text:p text:style-name="P54">(linguistic match)</text:p>
            <text:p text:style-name="P55"/>
            <text:p text:style-name="P56"><text:span text:style-name="T65">P</text:span>harmaceutical scientist</text:p>
            <text:p text:style-name="P55">(the people who mix/create the drugs)</text:p>
          </table:table-cell>
          <table:table-cell table:style-name="Table5.B2" office:value-type="string">
            <text:p text:style-name="P57">G5332</text:p>
            <text:p text:style-name="P58">Φαρμακεύς</text:p>
            <text:p text:style-name="P58">(pharmakeus)</text:p>
          </table:table-cell>
        </table:table-row>
        <table:table-row table:style-name="Table5.4">
          <table:table-cell table:style-name="Table5.A2" office:value-type="string">
            <text:p text:style-name="P59"><text:span text:style-name="T66">(commonly) </text:span><text:span text:style-name="T11">Scapegoat</text:span></text:p>
            <text:p text:style-name="P59"/>
            <text:p text:style-name="P60">(sociological &amp; clinical literature) “<text:span text:style-name="T11">The Pharmakos Complex</text:span>” or simply referring to a targeted individual in a group as "the pharmakos"</text:p>
          </table:table-cell>
          <table:table-cell table:style-name="Table5.B2" office:value-type="string">
            <text:p text:style-name="P59">G5333</text:p>
            <text:p text:style-name="P61">φάρμακος</text:p>
            <text:p text:style-name="P61">(pharmakos)</text:p>
          </table:table-cell>
        </table:table-row>
      </table:table>
      <text:p text:style-name="P48"/>
      <text:p text:style-name="P62"><text:span text:style-name="T67">While the others are self-evident the connection to the modern </text:span>“Scapegoat” / G5333 <text:span text:style-name="T67">might require a little more explanation</text:span>:</text:p>
      <text:p text:style-name="P62"/>
      <text:p text:style-name="P63">1. The Practical Connection (The Ritual)</text:p>
      <text:p text:style-name="P62"/>
      <text:p text:style-name="P62">In ancient Greece, the <text:span text:style-name="T27">pharmakos</text:span> was not just a sorcerer; he was a living lightning rod for collective guilt. When a city faced a crisis it could not control—like a plague, famine, or military invasion—the community experienced massive internal anxiety and friction.</text:p>
      <text:p text:style-name="P62"/>
      <text:p text:style-name="P62">To restore order, they did not look for a rational or scientific solution. Instead, they chose an outcast (the <text:span text:style-name="T27">pharmakos</text:span>), transferred all the "spiritual pollution" and blame of the city onto his head, and violently cast him out or executed him. The moment the <text:span text:style-name="T27">pharmakos</text:span> was banished, the community felt an immediate, psychological sense of relief and unity.</text:p>
      <text:p text:style-name="P62"/>
      <text:p text:style-name="P62">This is the exact definition of scapegoating. In modern psychology, sociology, and politics, a "<text:span text:style-name="T27">pharmakos</text:span>" or scapegoat is a person or minority group selected by a stressed community to bear the blame for a crisis they didn't cause, purely to relieve the community's internal tension.</text:p>
      <text:p text:style-name="P62"/>
      <text:p text:style-name="P63">2. The Linguistic Evolution</text:p>
      <text:p text:style-name="P62"/>
      <text:p text:style-name="P62">While the English word "scapegoat" comes from a translation choice in the Hebrew Old Testament (the <text:span text:style-name="T27">ez ozel</text:span> or "goat of departure" in <text:span text:style-name="T68">Leviticus 16</text:span>), Western sociological and psychological frameworks heavily <text:span text:style-name="T11">preserve</text:span> the literal Greek word <text:span text:style-name="T27">pharmakos</text:span> to describe this exact phenomenon.</text:p>
      <text:p text:style-name="P62"/>
      <text:p text:style-name="P62">Anthropologists and literary critics use the term “The Pharmakos Archetype” to describe:</text:p>
      <text:p text:style-name="P62"/>
      <text:list text:style-name="L4">
        <text:list-item>
          <text:p text:style-name="P64">A character in literature who is innocent but must die or be exiled so society can survive (<text:span text:style-name="T69">eg. </text:span>Shirley Jackson's short story <text:span text:style-name="T27">The Lottery</text:span>).</text:p>
        </text:list-item>
        <text:list-item>
          <text:p text:style-name="P64">The Office Pharmakos: A modern workplace dynamic where a failing corporate team unconsciously selects one worker to blame for all missed deadlines, convincing themselves that firing that one person will fix the entire company culture.</text:p>
        </text:list-item>
      </text:list>
      <text:p text:style-name="P65"><text:soft-page-break/>Now, in order to <text:span text:style-name="T70">further </text:span>bridge the gap <text:span text:style-name="T70">between the Bible and modern day </text:span>all we have to do is take the obvious connections to the words and put them together with the practical application of the Biblical words.</text:p>
      <text:p text:style-name="P65"/>
      <text:p text:style-name="P66"><text:span text:style-name="T70">Seemingly</text:span>, “pharmacies” and “pharmaceutical scientists” did not exist in “Biblical” times (quotes because Revelation is specifically talking about the time we’re living in right now). <text:span text:style-name="T71">But, they actually did </text:span><text:span text:style-name="T72">exist back then</text:span><text:span text:style-name="T71">, they just went by different names. </text:span><text:span text:style-name="T73">Even though the names aren’t the same we can still easily </text:span><text:span text:style-name="T74">connect them together</text:span><text:span text:style-name="T73"> them by their </text:span><text:span text:style-name="T75">practices</text:span><text:span text:style-name="T73"> (what they do and how they live).</text:span></text:p>
      <text:p text:style-name="P66"/>
      <text:p text:style-name="P67">There’s a simple example in scripture that we see going on every day around us. If only we would stop and think things through more carefully.</text:p>
      <text:p text:style-name="P67"/>
      <table:table table:name="Table6" table:style-name="Table6">
        <table:table-column table:style-name="Table6.A"/>
        <table:table-row>
          <table:table-cell table:style-name="Table6.A1" office:value-type="string">
            <text:p text:style-name="P68">Mark 5:25-34</text:p>
            <text:p text:style-name="P43"><text:span text:style-name="T13">25</text:span> And a certain woman, which had an issue of blood twelve years,</text:p>
            <text:p text:style-name="P43"><text:span text:style-name="T13">26</text:span> And <text:span text:style-name="T12">had suffered many things of many physicians</text:span>, and had <text:span text:style-name="T12">spent all that she had</text:span>, and was nothing bettered, but rather <text:span text:style-name="T12">grew worse</text:span>,</text:p>
            <text:p text:style-name="P43"><text:span text:style-name="T13">27</text:span> When she had heard of Jesus, came in the press behind, and touched his garment.</text:p>
            <text:p text:style-name="P43"><text:span text:style-name="T13">28</text:span> For she said, If I may touch but his clothes, I shall be whole.</text:p>
            <text:p text:style-name="P43"><text:span text:style-name="T13">29</text:span> And straightway the fountain of her blood was dried up; and she felt in her body that she was healed of that plague.</text:p>
            <text:p text:style-name="P43"><text:span text:style-name="T13">30</text:span> And Jesus, immediately knowing in himself that virtue had gone out of him, turned him about in the press, and said, <text:span text:style-name="T76">Who touched my clothes?</text:span></text:p>
            <text:p text:style-name="P43"><text:span text:style-name="T13">31</text:span> And his disciples said unto him, Thou seest the multitude thronging thee, and sayest thou, Who touched me?</text:p>
            <text:p text:style-name="P43"><text:span text:style-name="T13">32</text:span> And he looked round about to see her that had done this thing.</text:p>
            <text:p text:style-name="P43"><text:span text:style-name="T13">33</text:span> But the woman fearing and trembling, knowing what was done in her, came and fell down before him, and told him all the truth.</text:p>
            <text:p text:style-name="P43"><text:span text:style-name="T13">34</text:span> And he said unto her, <text:span text:style-name="T76">Daughter, </text:span><text:span text:style-name="T77">thy faith hath made thee whole</text:span><text:span text:style-name="T76">; go in peace, and be whole of thy plague.</text:span></text:p>
          </table:table-cell>
        </table:table-row>
      </table:table>
      <text:p text:style-name="P67"/>
      <text:p text:style-name="P69"><text:span text:style-name="T78">She spent all that she had trying to be healed of </text:span><text:span text:style-name="T79">physicians</text:span><text:span text:style-name="T80">. </text:span><text:span text:style-name="T81">She not only wasn’t healed of the physicians but she was </text:span><text:span text:style-name="T82">made worse</text:span><text:span text:style-name="T81"> because of what they did. </text:span><text:span text:style-name="T83">I have personally experienced this scenario. </text:span><text:span text:style-name="T84">How many people do you know that are stuck going back to the doctors over and over and yet they still get worse? </text:span><text:span text:style-name="T85">A</text:span><text:span text:style-name="T78">t that time </text:span><text:span text:style-name="T85">those </text:span><text:span text:style-name="T86">physicians</text:span><text:span text:style-name="T85"> </text:span><text:span text:style-name="T78">would have also either been themselves an </text:span><text:span text:style-name="T79">apothecary</text:span><text:span text:style-name="T78"> or consulted directly with </text:span><text:span text:style-name="T79">apothecaries</text:span> for potential cures. <text:span text:style-name="T78">The modern equivalent of an apothecary is a </text:span><text:span text:style-name="T79">pharmacist</text:span><text:span text:style-name="T78">. </text:span><text:span text:style-name="T87">How do pharmacists synthesis their drugs? Is it from plants, animals, and the environment </text:span><text:span text:style-name="T88">just </text:span><text:span text:style-name="T87">like every other </text:span><text:span text:style-name="T89">apothecary</text:span><text:span text:style-name="T87"> in history?</text:span></text:p>
      <text:p text:style-name="P70"/>
      <text:p text:style-name="P71">What exactly is the deception in <text:span text:style-name="T68">Revelation 18:23</text:span>? Could it be that man can take care of himself and cure all <text:span text:style-name="T90">of </text:span>his ailments without God? <text:span text:style-name="T90">In essence, “</text:span><text:span text:style-name="T91">ye shall be as gods</text:span><text:span text:style-name="T90">” (</text:span><text:span text:style-name="T92">Genesis 3:5</text:span><text:span text:style-name="T90">) which is </text:span><text:span text:style-name="T93">idolatry</text:span><text:span text:style-name="T90">.</text:span></text:p>
      <text:p text:style-name="P72"/>
      <text:p text:style-name="P72"/>
      <text:p text:style-name="P72"/>
      <text:p text:style-name="P73"><text:span text:style-name="T45">*</text:span> <text:span text:style-name="T94">Strong’s Hebrew/Greek, being a dictionary, </text:span><text:span text:style-name="T95">more</text:span><text:span text:style-name="T94"> often </text:span><text:span text:style-name="T95">than not </text:span><text:span text:style-name="T94">shows the most basic verb form of a word </text:span><text:span text:style-name="T96">(actual Hebrew roots are unpronounceable)</text:span><text:span text:style-name="T94">. Because it is a dictionary it </text:span><text:span text:style-name="T97">does not </text:span><text:span text:style-name="T98">even attempt</text:span><text:span text:style-name="T99"> to </text:span><text:span text:style-name="T94">precisely reflect the actual words used in God’s word in Hebrew and Greek. </text:span><text:span text:style-name="T99">It focuses on the roots of the actual words and this is how we can see the plethora of connections to elsewhere in scripture, </text:span><text:span text:style-name="T98">not</text:span><text:span text:style-name="T99"> because the exact same Hebrew word was used in two different places </text:span><text:span text:style-name="T100">and then translated to two different English words. </text:span><text:span text:style-name="T95">In other words, the words that you see in Strong’s concordance </text:span><text:span text:style-name="T101">are not</text:span><text:span text:style-name="T95"> exactly the same as the words in God’s word. Therefore, it is more appropriate to refer to them as roots because the words in Strong’s are </text:span><text:span text:style-name="T102">only</text:span><text:span text:style-name="T95"> part of the actual word </text:span><text:span text:style-name="T103">forms</text:span><text:span text:style-name="T95"> that were used </text:span><text:span text:style-name="T103">in God’s word. </text:span><text:span text:style-name="T104">If you need proof of these facts there is a wide variety of it in the following article </text:span><text:span text:style-name="T105">(and much more to be found </text:span><text:span text:style-name="T106">by</text:span><text:span text:style-name="T105"> the studious reader)</text:span><text:span text:style-name="T104">: </text:span><text:a xlink:type="simple" xlink:href="https://cheerful-wmcdannell.wordpress.com/2026/02/17/the-dangers-of-relying-on-strongs-concordance-for-hebrew-greek-studies/" text:style-name="Internet_20_link" text:visited-style-name="Visited_20_Internet_20_Link"><text:span text:style-name="T104">https://cheerful-wmcdannell.wordpress.com/2026/02/17/the-dangers-of-relying-on-strongs-concordance-for-hebrew-greek-studie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briela" svg:font-family="Gabriela"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Sans NF"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Sans NF" style:font-family-complex="'NotoSans NF'"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0T13:19:21.423645950</meta:creation-date>
    <dc:title>Pharmacists &amp; Sorcerers</dc:title>
    <meta:editing-duration>PT3H13M28S</meta:editing-duration>
    <meta:editing-cycles>232</meta:editing-cycles>
    <meta:generator>LibreOffice/26.2.4.2$Linux_X86_64 LibreOffice_project/64a984c51f4702dbd3710b13428c673a2f1292e7</meta:generator>
    <dc:date>2026-07-11T12:29:55.733312549</dc:date>
    <meta:document-statistic meta:table-count="6" meta:image-count="0" meta:object-count="0" meta:page-count="5" meta:paragraph-count="146" meta:word-count="2285" meta:character-count="13594" meta:non-whitespace-character-count="11471"/>
    <meta:template xlink:type="simple" xlink:actuate="onRequest" xlink:title="default" xlink:href="../../../../Templates/default.ott" meta:date="2026-05-20T13:19:20.173136023"/>
  </office:meta>
</office:document-meta>
</file>