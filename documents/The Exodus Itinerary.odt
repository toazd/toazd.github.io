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abriela" svg:font-family="Gabriela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0.4in" table:align="margins"/>
    </style:style>
    <style:style style:name="Table1.A" style:family="table-column">
      <style:table-column-properties style:column-width="2.2438in" style:rel-column-width="14141*"/>
    </style:style>
    <style:style style:name="Table1.B" style:family="table-column">
      <style:table-column-properties style:column-width="2.1438in" style:rel-column-width="13507*"/>
    </style:style>
    <style:style style:name="Table1.C" style:family="table-column">
      <style:table-column-properties style:column-width="3.0063in" style:rel-column-width="18943*"/>
    </style:style>
    <style:style style:name="Table1.D" style:family="table-column">
      <style:table-column-properties style:column-width="3.0063in" style:rel-column-width="18944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cccccc" fo:padding="0.0097in" fo:border-left="0.75pt solid #333333" fo:border-right="none" fo:border-top="0.75pt solid #333333" fo:border-bottom="0.75pt solid #333333">
        <style:background-image/>
      </style:table-cell-properties>
    </style:style>
    <style:style style:name="Table1.C1" style:family="table-cell">
      <style:table-cell-properties style:vertical-align="middle" fo:background-color="#cccccc" fo:padding="0.0097in" fo:border="0.75pt solid #333333">
        <style:background-image/>
      </style:table-cell-properties>
    </style:style>
    <style:style style:name="Table1.A2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2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2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3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3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3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4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4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4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5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5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5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6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6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6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7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7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7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8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8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8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9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9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9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10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10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10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11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11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11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12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12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12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13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13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13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14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14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14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15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15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15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16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16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16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17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17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17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D17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18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18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18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19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19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19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20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20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20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21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21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21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22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22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22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23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23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23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24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24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24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25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25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25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26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26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26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27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27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27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28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28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28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29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29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29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30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30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30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31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31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31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32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32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32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33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33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33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34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34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34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35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35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35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36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36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36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37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37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37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38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38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38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39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39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39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40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40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40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41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41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41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42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42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42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D42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43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43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43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D43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44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44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44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D44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45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45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45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D45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46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B46" style:family="table-cell">
      <style:table-cell-properties style:vertical-align="middle" fo:padding="0.0097in" fo:border-left="0.75pt solid #333333" fo:border-right="none" fo:border-top="none" fo:border-bottom="0.75pt solid #333333"/>
    </style:style>
    <style:style style:name="Table1.C46" style:family="table-cell">
      <style:table-cell-properties style:vertical-align="middle" fo:padding="0.0097in" fo:border-left="0.75pt solid #333333" fo:border-right="0.75pt solid #333333" fo:border-top="none" fo:border-bottom="0.75pt solid #333333"/>
    </style:style>
    <style:style style:name="Table1.A47" style:family="table-cell">
      <style:table-cell-properties style:vertical-align="middle" fo:background-color="#eeeeee" fo:padding="0.0097in" fo:border-left="0.75pt solid #333333" fo:border-right="none" fo:border-top="none" fo:border-bottom="0.75pt solid #333333">
        <style:background-image/>
      </style:table-cell-properties>
    </style:style>
    <style:style style:name="Table1.C47" style:family="table-cell">
      <style:table-cell-properties style:vertical-align="middle" fo:background-color="#eeeeee" fo:padding="0.0097in" fo:border-left="0.75pt solid #333333" fo:border-right="0.75pt solid #333333" fo:border-top="none" fo:border-bottom="0.75pt solid #333333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Gabriela" fo:font-size="14pt" officeooo:rsid="005b2c12" officeooo:paragraph-rsid="005b2c12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0pt" officeooo:rsid="01077b75" officeooo:paragraph-rsid="01077b75" style:font-size-asian="8.75pt" style:font-size-complex="10pt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1cb494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28cb4c"/>
    </style:style>
    <style:style style:name="P7" style:family="paragraph" style:parent-style-name="Table_20_Contents">
      <style:paragraph-properties fo:text-align="center" style:justify-single-word="false"/>
      <style:text-properties officeooo:rsid="01a39af9" officeooo:paragraph-rsid="01a39af9"/>
    </style:style>
    <style:style style:name="P8" style:family="paragraph" style:parent-style-name="Table_20_Contents">
      <style:paragraph-properties fo:text-align="center" style:justify-single-word="false"/>
      <style:text-properties officeooo:rsid="019a9025" officeooo:paragraph-rsid="019a9025"/>
    </style:style>
    <style:style style:name="P9" style:family="paragraph" style:parent-style-name="Table_20_Contents">
      <style:text-properties officeooo:rsid="019e5ce6" officeooo:paragraph-rsid="019e5ce6"/>
    </style:style>
    <style:style style:name="P10" style:family="paragraph" style:parent-style-name="Table_20_Contents">
      <style:paragraph-properties fo:text-align="center" style:justify-single-word="false"/>
      <style:text-properties officeooo:rsid="019c62b8" officeooo:paragraph-rsid="019c62b8"/>
    </style:style>
    <style:style style:name="P11" style:family="paragraph" style:parent-style-name="Table_20_Contents">
      <style:paragraph-properties fo:text-align="center" style:justify-single-word="false"/>
      <style:text-properties officeooo:paragraph-rsid="0198b55b"/>
    </style:style>
    <style:style style:name="P12" style:family="paragraph" style:parent-style-name="Table_20_Contents">
      <style:text-properties officeooo:rsid="01970774" officeooo:paragraph-rsid="01970774"/>
    </style:style>
    <style:style style:name="P13" style:family="paragraph" style:parent-style-name="Table_20_Contents">
      <style:text-properties fo:font-weight="normal" officeooo:rsid="01970774" officeooo:paragraph-rsid="01970774" style:font-weight-asian="normal" style:font-weight-complex="normal"/>
    </style:style>
    <style:style style:name="P14" style:family="paragraph" style:parent-style-name="Table_20_Contents">
      <style:text-properties fo:font-weight="normal" officeooo:rsid="01a27859" officeooo:paragraph-rsid="01a27859" style:font-weight-asian="normal" style:font-weight-complex="normal"/>
    </style:style>
    <style:style style:name="P15" style:family="paragraph" style:parent-style-name="Table_20_Contents">
      <style:text-properties officeooo:paragraph-rsid="007c5ddf"/>
    </style:style>
    <style:style style:name="P16" style:family="paragraph" style:parent-style-name="Table_20_Contents">
      <style:text-properties officeooo:paragraph-rsid="007ea305"/>
    </style:style>
    <style:style style:name="P17" style:family="paragraph" style:parent-style-name="Table_20_Contents">
      <style:paragraph-properties fo:text-align="center" style:justify-single-word="false"/>
      <style:text-properties officeooo:paragraph-rsid="0188ccb0"/>
    </style:style>
    <style:style style:name="P18" style:family="paragraph" style:parent-style-name="Table_20_Contents">
      <style:paragraph-properties fo:text-align="center" style:justify-single-word="false"/>
      <style:text-properties officeooo:paragraph-rsid="01864728"/>
    </style:style>
    <style:style style:name="P19" style:family="paragraph" style:parent-style-name="Table_20_Contents">
      <style:text-properties officeooo:paragraph-rsid="007f738f"/>
    </style:style>
    <style:style style:name="P20" style:family="paragraph" style:parent-style-name="Table_20_Contents">
      <style:text-properties officeooo:paragraph-rsid="0186b955"/>
    </style:style>
    <style:style style:name="P21" style:family="paragraph" style:parent-style-name="Table_20_Contents">
      <style:text-properties fo:font-weight="bold" officeooo:paragraph-rsid="01851d0f" style:font-weight-asian="bold" style:font-weight-complex="bold"/>
    </style:style>
    <style:style style:name="P22" style:family="paragraph" style:parent-style-name="Table_20_Contents">
      <style:text-properties officeooo:paragraph-rsid="01851d0f"/>
    </style:style>
    <style:style style:name="P23" style:family="paragraph" style:parent-style-name="Table_20_Contents">
      <style:paragraph-properties fo:text-align="center" style:justify-single-word="false"/>
      <style:text-properties officeooo:paragraph-rsid="00294813"/>
    </style:style>
    <style:style style:name="P24" style:family="paragraph" style:parent-style-name="Table_20_Contents">
      <style:text-properties fo:font-weight="bold" officeooo:paragraph-rsid="008219a6" style:font-weight-asian="bold" style:font-weight-complex="bold"/>
    </style:style>
    <style:style style:name="P25" style:family="paragraph" style:parent-style-name="Table_20_Contents">
      <style:text-properties officeooo:paragraph-rsid="008219a6"/>
    </style:style>
    <style:style style:name="P26" style:family="paragraph" style:parent-style-name="Table_20_Contents">
      <style:text-properties officeooo:paragraph-rsid="00826560"/>
    </style:style>
    <style:style style:name="P27" style:family="paragraph" style:parent-style-name="Table_20_Contents">
      <style:paragraph-properties fo:text-align="center" style:justify-single-word="false"/>
      <style:text-properties officeooo:rsid="012f853b" officeooo:paragraph-rsid="012f853b"/>
    </style:style>
    <style:style style:name="P28" style:family="paragraph" style:parent-style-name="Table_20_Contents">
      <style:paragraph-properties fo:text-align="center" style:justify-single-word="false"/>
      <style:text-properties officeooo:rsid="00f7e0f9" officeooo:paragraph-rsid="00f7e0f9"/>
    </style:style>
    <style:style style:name="P29" style:family="paragraph" style:parent-style-name="Table_20_Contents">
      <style:paragraph-properties fo:text-align="center" style:justify-single-word="false"/>
      <style:text-properties officeooo:rsid="009e719d" officeooo:paragraph-rsid="009e719d"/>
    </style:style>
    <style:style style:name="P30" style:family="paragraph" style:parent-style-name="Table_20_Contents">
      <style:paragraph-properties fo:text-align="center" style:justify-single-word="false"/>
      <style:text-properties officeooo:paragraph-rsid="009e719d"/>
    </style:style>
    <style:style style:name="P31" style:family="paragraph" style:parent-style-name="Table_20_Contents">
      <style:paragraph-properties fo:text-align="center" style:justify-single-word="false"/>
      <style:text-properties officeooo:rsid="00f4b121" officeooo:paragraph-rsid="00f4b121"/>
    </style:style>
    <style:style style:name="P32" style:family="paragraph" style:parent-style-name="Table_20_Contents">
      <style:text-properties officeooo:rsid="009e719d" officeooo:paragraph-rsid="009e719d"/>
    </style:style>
    <style:style style:name="P33" style:family="paragraph" style:parent-style-name="Table_20_Contents">
      <style:paragraph-properties fo:text-align="center" style:justify-single-word="false"/>
      <style:text-properties officeooo:rsid="002ca556" officeooo:paragraph-rsid="002ca556"/>
    </style:style>
    <style:style style:name="P34" style:family="paragraph" style:parent-style-name="Table_20_Contents">
      <style:text-properties officeooo:rsid="002ca556" officeooo:paragraph-rsid="002ca556"/>
    </style:style>
    <style:style style:name="P35" style:family="paragraph" style:parent-style-name="Table_20_Contents">
      <style:paragraph-properties fo:text-align="center" style:justify-single-word="false"/>
      <style:text-properties officeooo:rsid="0034dc7b" officeooo:paragraph-rsid="0034dc7b"/>
    </style:style>
    <style:style style:name="P36" style:family="paragraph" style:parent-style-name="Table_20_Contents">
      <style:text-properties officeooo:rsid="0035d262" officeooo:paragraph-rsid="0035d262"/>
    </style:style>
    <style:style style:name="P37" style:family="paragraph" style:parent-style-name="Table_20_Contents">
      <style:text-properties officeooo:rsid="00a3f0c9" officeooo:paragraph-rsid="00a3f0c9"/>
    </style:style>
    <style:style style:name="P38" style:family="paragraph" style:parent-style-name="Table_20_Contents">
      <style:text-properties officeooo:paragraph-rsid="003729c5"/>
    </style:style>
    <style:style style:name="P39" style:family="paragraph" style:parent-style-name="Table_20_Contents">
      <style:text-properties officeooo:rsid="0038f581" officeooo:paragraph-rsid="0038f581"/>
    </style:style>
    <style:style style:name="P40" style:family="paragraph" style:parent-style-name="Table_20_Contents">
      <style:paragraph-properties fo:text-align="center" style:justify-single-word="false"/>
      <style:text-properties officeooo:rsid="0038f581" officeooo:paragraph-rsid="0038f581"/>
    </style:style>
    <style:style style:name="P41" style:family="paragraph" style:parent-style-name="Table_20_Contents">
      <style:text-properties officeooo:rsid="003fd05c" officeooo:paragraph-rsid="003fd05c"/>
    </style:style>
    <style:style style:name="P42" style:family="paragraph" style:parent-style-name="Table_20_Contents">
      <style:paragraph-properties fo:text-align="center" style:justify-single-word="false"/>
      <style:text-properties officeooo:rsid="0051fa7f" officeooo:paragraph-rsid="0051fa7f"/>
    </style:style>
    <style:style style:name="P43" style:family="paragraph" style:parent-style-name="Table_20_Contents">
      <style:text-properties officeooo:rsid="0040444e" officeooo:paragraph-rsid="0040444e"/>
    </style:style>
    <style:style style:name="P44" style:family="paragraph" style:parent-style-name="Table_20_Contents">
      <style:text-properties officeooo:rsid="00726ac4" officeooo:paragraph-rsid="00840d5d"/>
    </style:style>
    <style:style style:name="P45" style:family="paragraph" style:parent-style-name="Table_20_Contents">
      <style:text-properties officeooo:rsid="0073eb84" officeooo:paragraph-rsid="00840d5d"/>
    </style:style>
    <style:style style:name="P46" style:family="paragraph" style:parent-style-name="Table_20_Contents">
      <style:text-properties officeooo:rsid="00759483" officeooo:paragraph-rsid="00840d5d"/>
    </style:style>
    <style:style style:name="P47" style:family="paragraph" style:parent-style-name="Table_20_Contents">
      <style:text-properties fo:font-weight="bold" officeooo:rsid="0040444e" officeooo:paragraph-rsid="0040444e" style:font-weight-asian="bold" style:font-weight-complex="bold"/>
    </style:style>
    <style:style style:name="P48" style:family="paragraph" style:parent-style-name="Table_20_Contents">
      <style:text-properties officeooo:rsid="00721a98" officeooo:paragraph-rsid="0129ff66"/>
    </style:style>
    <style:style style:name="P49" style:family="paragraph" style:parent-style-name="Table_20_Contents">
      <style:paragraph-properties fo:text-align="center" style:justify-single-word="false"/>
      <style:text-properties officeooo:rsid="0045dfd7" officeooo:paragraph-rsid="0045dfd7"/>
    </style:style>
    <style:style style:name="P50" style:family="paragraph" style:parent-style-name="Table_20_Contents">
      <style:text-properties fo:font-weight="bold" officeooo:rsid="0040aa5e" style:font-weight-asian="bold" style:font-weight-complex="bold"/>
    </style:style>
    <style:style style:name="P51" style:family="paragraph" style:parent-style-name="Table_20_Contents">
      <style:text-properties officeooo:rsid="012bfbd1" officeooo:paragraph-rsid="012bfbd1"/>
    </style:style>
    <style:style style:name="P52" style:family="paragraph" style:parent-style-name="Table_20_Contents">
      <style:paragraph-properties fo:text-align="center" style:justify-single-word="false"/>
      <style:text-properties officeooo:rsid="0098a614" officeooo:paragraph-rsid="0098a614"/>
    </style:style>
    <style:style style:name="P53" style:family="paragraph" style:parent-style-name="Table_20_Contents">
      <style:text-properties officeooo:rsid="0098a614" officeooo:paragraph-rsid="0098a614"/>
    </style:style>
    <style:style style:name="P54" style:family="paragraph" style:parent-style-name="Table_20_Contents">
      <style:paragraph-properties fo:text-align="center" style:justify-single-word="false"/>
      <style:text-properties officeooo:rsid="0042f850" officeooo:paragraph-rsid="0042f850"/>
    </style:style>
    <style:style style:name="P55" style:family="paragraph" style:parent-style-name="Table_20_Contents">
      <style:text-properties officeooo:rsid="0041dde1" officeooo:paragraph-rsid="0041dde1"/>
    </style:style>
    <style:style style:name="P56" style:family="paragraph" style:parent-style-name="Table_20_Contents">
      <style:text-properties officeooo:rsid="009977e0" officeooo:paragraph-rsid="009977e0"/>
    </style:style>
    <style:style style:name="P57" style:family="paragraph" style:parent-style-name="Table_20_Contents">
      <style:paragraph-properties fo:text-align="center" style:justify-single-word="false"/>
      <style:text-properties officeooo:paragraph-rsid="002a42e7"/>
    </style:style>
    <style:style style:name="P58" style:family="paragraph" style:parent-style-name="Table_20_Contents">
      <style:paragraph-properties fo:text-align="center" style:justify-single-word="false"/>
      <style:text-properties officeooo:rsid="018ebcaf" officeooo:paragraph-rsid="018ebcaf"/>
    </style:style>
    <style:style style:name="P59" style:family="paragraph" style:parent-style-name="Table_20_Contents">
      <style:text-properties officeooo:paragraph-rsid="005d2a82"/>
    </style:style>
    <style:style style:name="P60" style:family="paragraph" style:parent-style-name="Table_20_Contents">
      <style:text-properties fo:font-weight="bold" officeooo:paragraph-rsid="005d2a82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officeooo:rsid="0047f5d9" officeooo:paragraph-rsid="01353626"/>
    </style:style>
    <style:style style:name="P62" style:family="paragraph" style:parent-style-name="Table_20_Contents">
      <style:paragraph-properties fo:text-align="center" style:justify-single-word="false"/>
      <style:text-properties officeooo:rsid="0047f5d9" officeooo:paragraph-rsid="0053d16e"/>
    </style:style>
    <style:style style:name="P63" style:family="paragraph" style:parent-style-name="Table_20_Contents">
      <style:text-properties officeooo:paragraph-rsid="0135cdc6"/>
    </style:style>
    <style:style style:name="P64" style:family="paragraph" style:parent-style-name="Table_20_Contents">
      <style:text-properties fo:font-weight="normal" officeooo:rsid="0031afa2" officeooo:paragraph-rsid="0135cdc6" style:font-weight-asian="normal" style:font-weight-complex="normal"/>
    </style:style>
    <style:style style:name="P65" style:family="paragraph" style:parent-style-name="Table_20_Contents">
      <style:text-properties fo:font-weight="normal" officeooo:rsid="013be8a4" officeooo:paragraph-rsid="013be8a4" style:font-weight-asian="normal" style:font-weight-complex="normal"/>
    </style:style>
    <style:style style:name="P66" style:family="paragraph" style:parent-style-name="Table_20_Contents">
      <style:text-properties fo:font-weight="normal" officeooo:rsid="01633168" officeooo:paragraph-rsid="01633168" style:font-weight-asian="normal" style:font-weight-complex="normal"/>
    </style:style>
    <style:style style:name="P67" style:family="paragraph" style:parent-style-name="Table_20_Contents">
      <style:text-properties fo:font-weight="normal" officeooo:rsid="0063f0aa" officeooo:paragraph-rsid="0135cdc6" style:font-weight-asian="normal" style:font-weight-complex="normal"/>
    </style:style>
    <style:style style:name="P68" style:family="paragraph" style:parent-style-name="Table_20_Contents">
      <style:text-properties officeooo:rsid="00579715" officeooo:paragraph-rsid="013c1b8d"/>
    </style:style>
    <style:style style:name="P69" style:family="paragraph" style:parent-style-name="Table_20_Contents">
      <style:text-properties officeooo:rsid="013c1b8d" officeooo:paragraph-rsid="013c1b8d"/>
    </style:style>
    <style:style style:name="P70" style:family="paragraph" style:parent-style-name="Table_20_Contents">
      <style:text-properties officeooo:rsid="00579715" officeooo:paragraph-rsid="0135cdc6"/>
    </style:style>
    <style:style style:name="P71" style:family="paragraph" style:parent-style-name="Table_20_Contents">
      <style:text-properties fo:font-weight="normal" officeooo:rsid="00439b82" officeooo:paragraph-rsid="0135cdc6" style:font-weight-asian="normal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officeooo:rsid="013ef73a" officeooo:paragraph-rsid="013ef73a"/>
    </style:style>
    <style:style style:name="P73" style:family="paragraph" style:parent-style-name="Table_20_Contents">
      <style:paragraph-properties fo:text-align="center" style:justify-single-word="false"/>
      <style:text-properties officeooo:rsid="0048b9ae" officeooo:paragraph-rsid="0048b9ae"/>
    </style:style>
    <style:style style:name="P74" style:family="paragraph" style:parent-style-name="Table_20_Contents">
      <style:text-properties officeooo:rsid="01378e1e" officeooo:paragraph-rsid="013e1635"/>
    </style:style>
    <style:style style:name="P75" style:family="paragraph" style:parent-style-name="Table_20_Contents">
      <style:text-properties officeooo:rsid="0047727a" officeooo:paragraph-rsid="013e1635"/>
    </style:style>
    <style:style style:name="P76" style:family="paragraph" style:parent-style-name="Table_20_Contents">
      <style:text-properties officeooo:rsid="00725ec6" officeooo:paragraph-rsid="01369546"/>
    </style:style>
    <style:style style:name="P77" style:family="paragraph" style:parent-style-name="Table_20_Contents">
      <style:text-properties officeooo:rsid="014b6a60" officeooo:paragraph-rsid="014b6a60"/>
    </style:style>
    <style:style style:name="P78" style:family="paragraph" style:parent-style-name="Table_20_Contents">
      <style:paragraph-properties fo:text-align="center" style:justify-single-word="false"/>
      <style:text-properties officeooo:rsid="0145608e" officeooo:paragraph-rsid="0145608e"/>
    </style:style>
    <style:style style:name="P79" style:family="paragraph" style:parent-style-name="Table_20_Contents">
      <style:paragraph-properties fo:text-align="center" style:justify-single-word="false"/>
      <style:text-properties officeooo:rsid="004a907b" officeooo:paragraph-rsid="0145608e"/>
    </style:style>
    <style:style style:name="P80" style:family="paragraph" style:parent-style-name="Table_20_Contents">
      <style:paragraph-properties fo:text-align="center" style:justify-single-word="false"/>
      <style:text-properties officeooo:rsid="018fed72" officeooo:paragraph-rsid="018fed72"/>
    </style:style>
    <style:style style:name="P81" style:family="paragraph" style:parent-style-name="Table_20_Contents">
      <style:paragraph-properties fo:text-align="center" style:justify-single-word="false"/>
      <style:text-properties officeooo:rsid="014eed15" officeooo:paragraph-rsid="014eed15"/>
    </style:style>
    <style:style style:name="P82" style:family="paragraph" style:parent-style-name="Table_20_Contents">
      <style:text-properties officeooo:rsid="0047f5d9" officeooo:paragraph-rsid="0145608e"/>
    </style:style>
    <style:style style:name="P83" style:family="paragraph" style:parent-style-name="Table_20_Contents">
      <style:text-properties fo:font-weight="normal" officeooo:rsid="016df336" officeooo:paragraph-rsid="0145608e" style:font-weight-asian="normal" style:font-weight-complex="normal"/>
    </style:style>
    <style:style style:name="P84" style:family="paragraph" style:parent-style-name="Table_20_Contents">
      <style:text-properties fo:font-weight="normal" officeooo:rsid="016dfe58" officeooo:paragraph-rsid="016dfe58" style:font-weight-asian="normal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officeooo:rsid="0158514a" officeooo:paragraph-rsid="0158514a"/>
    </style:style>
    <style:style style:name="P86" style:family="paragraph" style:parent-style-name="Table_20_Contents">
      <style:paragraph-properties fo:text-align="center" style:justify-single-word="false"/>
      <style:text-properties officeooo:rsid="0190095d" officeooo:paragraph-rsid="0190095d"/>
    </style:style>
    <style:style style:name="P87" style:family="paragraph" style:parent-style-name="Table_20_Contents">
      <style:paragraph-properties fo:text-align="center" style:justify-single-word="false"/>
      <style:text-properties officeooo:rsid="0190da47" officeooo:paragraph-rsid="0190da47"/>
    </style:style>
    <style:style style:name="P88" style:family="paragraph" style:parent-style-name="Table_20_Contents">
      <style:text-properties officeooo:rsid="01378e1e" officeooo:paragraph-rsid="0172b839"/>
    </style:style>
    <style:style style:name="P89" style:family="paragraph" style:parent-style-name="Table_20_Contents">
      <style:text-properties officeooo:rsid="015a7021" officeooo:paragraph-rsid="015a7021"/>
    </style:style>
    <style:style style:name="P90" style:family="paragraph" style:parent-style-name="Table_20_Contents">
      <style:text-properties officeooo:rsid="015aad4f" officeooo:paragraph-rsid="015aad4f"/>
    </style:style>
    <style:style style:name="P91" style:family="paragraph" style:parent-style-name="Table_20_Contents">
      <style:paragraph-properties fo:text-align="center" style:justify-single-word="false"/>
      <style:text-properties officeooo:rsid="00e980de" officeooo:paragraph-rsid="00e980de"/>
    </style:style>
    <style:style style:name="P92" style:family="paragraph" style:parent-style-name="Table_20_Contents">
      <style:paragraph-properties fo:text-align="center" style:justify-single-word="false"/>
      <style:text-properties officeooo:rsid="00eb03b3" officeooo:paragraph-rsid="00eb03b3"/>
    </style:style>
    <style:style style:name="P93" style:family="paragraph" style:parent-style-name="Table_20_Contents">
      <style:text-properties officeooo:paragraph-rsid="00d54840"/>
    </style:style>
    <style:style style:name="P94" style:family="paragraph" style:parent-style-name="Table_20_Contents">
      <style:text-properties officeooo:rsid="00d901fc" officeooo:paragraph-rsid="01146b7c"/>
    </style:style>
    <style:style style:name="P95" style:family="paragraph" style:parent-style-name="Table_20_Contents">
      <style:text-properties officeooo:rsid="00f98bae" officeooo:paragraph-rsid="00f98bae"/>
    </style:style>
    <style:style style:name="P96" style:family="paragraph" style:parent-style-name="Table_20_Contents">
      <style:text-properties officeooo:rsid="0100f1ad" officeooo:paragraph-rsid="01163bc3"/>
    </style:style>
    <style:style style:name="P97" style:family="paragraph" style:parent-style-name="Table_20_Contents">
      <style:text-properties officeooo:rsid="011d317e" officeooo:paragraph-rsid="01349c55"/>
    </style:style>
    <style:style style:name="P98" style:family="paragraph" style:parent-style-name="Table_20_Contents">
      <style:paragraph-properties fo:text-align="center" style:justify-single-word="false"/>
      <style:text-properties officeooo:paragraph-rsid="00637267"/>
    </style:style>
    <style:style style:name="P99" style:family="paragraph" style:parent-style-name="Standard">
      <style:text-properties style:font-name="Liberation Sans" fo:font-size="12pt" style:font-size-asian="12pt" style:font-size-complex="12pt"/>
    </style:style>
    <style:style style:name="T1" style:family="text">
      <style:text-properties officeooo:rsid="01243558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officeooo:rsid="017d144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19bb959"/>
    </style:style>
    <style:style style:name="T6" style:family="text">
      <style:text-properties fo:font-weight="bold" officeooo:rsid="01970774" style:font-weight-asian="bold" style:font-weight-complex="bold"/>
    </style:style>
    <style:style style:name="T7" style:family="text">
      <style:text-properties officeooo:rsid="019f84e7"/>
    </style:style>
    <style:style style:name="T8" style:family="text">
      <style:text-properties officeooo:rsid="01a39af9"/>
    </style:style>
    <style:style style:name="T9" style:family="text">
      <style:text-properties officeooo:rsid="01a735f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19bb959" style:font-weight-asian="normal" style:font-weight-complex="normal"/>
    </style:style>
    <style:style style:name="T12" style:family="text">
      <style:text-properties officeooo:rsid="01a4c27a"/>
    </style:style>
    <style:style style:name="T13" style:family="text">
      <style:text-properties officeooo:rsid="01a5955e"/>
    </style:style>
    <style:style style:name="T14" style:family="text">
      <style:text-properties officeooo:rsid="01a91419"/>
    </style:style>
    <style:style style:name="T15" style:family="text">
      <style:text-properties officeooo:rsid="01a91e71"/>
    </style:style>
    <style:style style:name="T16" style:family="text">
      <style:text-properties officeooo:rsid="01ab0a35"/>
    </style:style>
    <style:style style:name="T17" style:family="text">
      <style:text-properties officeooo:rsid="0181c34d"/>
    </style:style>
    <style:style style:name="T18" style:family="text">
      <style:text-properties officeooo:rsid="0183901e"/>
    </style:style>
    <style:style style:name="T19" style:family="text">
      <style:text-properties officeooo:rsid="0183e47d"/>
    </style:style>
    <style:style style:name="T20" style:family="text">
      <style:text-properties officeooo:rsid="007e382b"/>
    </style:style>
    <style:style style:name="T21" style:family="text">
      <style:text-properties officeooo:rsid="001c79aa"/>
    </style:style>
    <style:style style:name="T22" style:family="text">
      <style:text-properties officeooo:rsid="007f738f"/>
    </style:style>
    <style:style style:name="T23" style:family="text">
      <style:text-properties officeooo:rsid="0188ccb0"/>
    </style:style>
    <style:style style:name="T24" style:family="text">
      <style:text-properties officeooo:rsid="01864728"/>
    </style:style>
    <style:style style:name="T25" style:family="text">
      <style:text-properties officeooo:rsid="018cc6fc"/>
    </style:style>
    <style:style style:name="T26" style:family="text">
      <style:text-properties officeooo:rsid="00a24172"/>
    </style:style>
    <style:style style:name="T27" style:family="text">
      <style:text-properties fo:font-weight="normal" officeooo:rsid="0186b955" style:font-weight-asian="normal" style:font-weight-complex="normal"/>
    </style:style>
    <style:style style:name="T28" style:family="text">
      <style:text-properties fo:font-weight="normal" officeooo:rsid="01887e39" style:font-weight-asian="normal" style:font-weight-complex="normal"/>
    </style:style>
    <style:style style:name="T29" style:family="text">
      <style:text-properties officeooo:rsid="00227d5f"/>
    </style:style>
    <style:style style:name="T30" style:family="text">
      <style:text-properties officeooo:rsid="00294813"/>
    </style:style>
    <style:style style:name="T31" style:family="text">
      <style:text-properties officeooo:rsid="013530fb"/>
    </style:style>
    <style:style style:name="T32" style:family="text">
      <style:text-properties style:text-position="super 58%"/>
    </style:style>
    <style:style style:name="T33" style:family="text">
      <style:text-properties officeooo:rsid="012f853b"/>
    </style:style>
    <style:style style:name="T34" style:family="text">
      <style:text-properties officeooo:rsid="01314ffc"/>
    </style:style>
    <style:style style:name="T35" style:family="text">
      <style:text-properties officeooo:rsid="00245d25"/>
    </style:style>
    <style:style style:name="T36" style:family="text">
      <style:text-properties officeooo:rsid="009e719d"/>
    </style:style>
    <style:style style:name="T37" style:family="text">
      <style:text-properties style:text-position="super 58%" officeooo:rsid="009e719d"/>
    </style:style>
    <style:style style:name="T38" style:family="text">
      <style:text-properties officeooo:rsid="009e9e3f"/>
    </style:style>
    <style:style style:name="T39" style:family="text">
      <style:text-properties fo:font-weight="bold" officeooo:rsid="002e5a4d" style:font-weight-asian="bold" style:font-weight-complex="bold"/>
    </style:style>
    <style:style style:name="T40" style:family="text">
      <style:text-properties officeooo:rsid="00a52393"/>
    </style:style>
    <style:style style:name="T41" style:family="text">
      <style:text-properties fo:font-weight="bold" officeooo:rsid="004ee20a" style:font-weight-asian="bold" style:font-weight-complex="bold"/>
    </style:style>
    <style:style style:name="T42" style:family="text">
      <style:text-properties fo:font-weight="bold" officeooo:rsid="003729c5" style:font-weight-asian="bold" style:font-weight-complex="bold"/>
    </style:style>
    <style:style style:name="T43" style:family="text">
      <style:text-properties officeooo:rsid="003729c5"/>
    </style:style>
    <style:style style:name="T44" style:family="text">
      <style:text-properties officeooo:rsid="003fd05c"/>
    </style:style>
    <style:style style:name="T45" style:family="text">
      <style:text-properties officeooo:rsid="00831ff5"/>
    </style:style>
    <style:style style:name="T46" style:family="text">
      <style:text-properties officeooo:rsid="008619b5"/>
    </style:style>
    <style:style style:name="T47" style:family="text">
      <style:text-properties officeooo:rsid="0075025a"/>
    </style:style>
    <style:style style:name="T48" style:family="text">
      <style:text-properties officeooo:rsid="0075199e"/>
    </style:style>
    <style:style style:name="T49" style:family="text">
      <style:text-properties fo:font-style="italic" officeooo:rsid="0075199e" style:font-style-asian="italic" style:font-style-complex="italic"/>
    </style:style>
    <style:style style:name="T50" style:family="text">
      <style:text-properties fo:font-style="italic" officeooo:rsid="008619b5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officeooo:rsid="00788c88"/>
    </style:style>
    <style:style style:name="T53" style:family="text">
      <style:text-properties officeooo:rsid="00868815"/>
    </style:style>
    <style:style style:name="T54" style:family="text">
      <style:text-properties officeooo:rsid="0076b0b1"/>
    </style:style>
    <style:style style:name="T55" style:family="text">
      <style:text-properties officeooo:rsid="01278efe"/>
    </style:style>
    <style:style style:name="T56" style:family="text">
      <style:text-properties officeooo:rsid="012943fd"/>
    </style:style>
    <style:style style:name="T57" style:family="text">
      <style:text-properties officeooo:rsid="0129ff66"/>
    </style:style>
    <style:style style:name="T58" style:family="text">
      <style:text-properties officeooo:rsid="00896fac"/>
    </style:style>
    <style:style style:name="T59" style:family="text">
      <style:text-properties fo:font-weight="bold" officeooo:rsid="0040aa5e" style:font-weight-asian="bold" style:font-weight-complex="bold"/>
    </style:style>
    <style:style style:name="T60" style:family="text">
      <style:text-properties officeooo:rsid="0040aa5e"/>
    </style:style>
    <style:style style:name="T61" style:family="text">
      <style:text-properties style:font-name="Liberation Sans" officeooo:rsid="008b455c" style:font-name-complex="Liberation Sans"/>
    </style:style>
    <style:style style:name="T62" style:family="text">
      <style:text-properties style:font-name="Liberation Sans" style:font-name-complex="Liberation Sans"/>
    </style:style>
    <style:style style:name="T63" style:family="text">
      <style:text-properties style:font-name="Liberation Sans" fo:font-style="italic" style:font-style-asian="italic" style:font-name-complex="Liberation Sans" style:font-style-complex="italic"/>
    </style:style>
    <style:style style:name="T64" style:family="text">
      <style:text-properties officeooo:rsid="008d1fee"/>
    </style:style>
    <style:style style:name="T65" style:family="text">
      <style:text-properties officeooo:rsid="015157fe"/>
    </style:style>
    <style:style style:name="T66" style:family="text">
      <style:text-properties fo:font-weight="normal" officeooo:rsid="01341266" style:font-weight-asian="normal" style:font-weight-complex="normal"/>
    </style:style>
    <style:style style:name="T67" style:family="text">
      <style:text-properties fo:font-weight="bold" officeooo:rsid="01341266" style:font-weight-asian="bold" style:font-weight-complex="bold"/>
    </style:style>
    <style:style style:name="T68" style:family="text">
      <style:text-properties officeooo:rsid="005dd331"/>
    </style:style>
    <style:style style:name="T69" style:family="text">
      <style:text-properties officeooo:rsid="015354a3"/>
    </style:style>
    <style:style style:name="T70" style:family="text">
      <style:text-properties officeooo:rsid="0153a30e"/>
    </style:style>
    <style:style style:name="T71" style:family="text">
      <style:text-properties officeooo:rsid="0048c6d4"/>
    </style:style>
    <style:style style:name="T72" style:family="text">
      <style:text-properties officeooo:rsid="00265090"/>
    </style:style>
    <style:style style:name="T73" style:family="text">
      <style:text-properties fo:font-weight="bold" officeooo:rsid="00265090" style:font-weight-asian="bold" style:font-weight-complex="bold"/>
    </style:style>
    <style:style style:name="T74" style:family="text">
      <style:text-properties fo:font-weight="normal" officeooo:rsid="00265090" style:font-weight-asian="normal" style:font-weight-complex="normal"/>
    </style:style>
    <style:style style:name="T75" style:family="text">
      <style:text-properties fo:font-weight="bold" officeooo:rsid="00439b82" style:font-weight-asian="bold" style:font-weight-complex="bold"/>
    </style:style>
    <style:style style:name="T76" style:family="text">
      <style:text-properties fo:font-weight="normal" officeooo:rsid="00439b82" style:font-weight-asian="normal" style:font-weight-complex="normal"/>
    </style:style>
    <style:style style:name="T77" style:family="text">
      <style:text-properties fo:font-weight="normal" officeooo:rsid="0168feb1" style:font-weight-asian="normal" style:font-weight-complex="normal"/>
    </style:style>
    <style:style style:name="T78" style:family="text">
      <style:text-properties officeooo:rsid="013c6606"/>
    </style:style>
    <style:style style:name="T79" style:family="text">
      <style:text-properties officeooo:rsid="0167f9c6"/>
    </style:style>
    <style:style style:name="T80" style:family="text">
      <style:text-properties officeooo:rsid="013be8a4"/>
    </style:style>
    <style:style style:name="T81" style:family="text">
      <style:text-properties officeooo:rsid="00919197"/>
    </style:style>
    <style:style style:name="T82" style:family="text">
      <style:text-properties officeooo:rsid="01641236"/>
    </style:style>
    <style:style style:name="T83" style:family="text">
      <style:text-properties officeooo:rsid="01655d12"/>
    </style:style>
    <style:style style:name="T84" style:family="text">
      <style:text-properties fo:font-weight="bold" officeooo:rsid="00582f23" style:font-weight-asian="bold" style:font-weight-complex="bold"/>
    </style:style>
    <style:style style:name="T85" style:family="text">
      <style:text-properties fo:font-weight="normal" officeooo:rsid="00582f23" style:font-weight-asian="normal" style:font-weight-complex="normal"/>
    </style:style>
    <style:style style:name="T86" style:family="text">
      <style:text-properties fo:font-weight="bold" officeooo:rsid="00440a47" style:font-weight-asian="bold" style:font-weight-complex="bold"/>
    </style:style>
    <style:style style:name="T87" style:family="text">
      <style:text-properties fo:font-weight="bold" officeooo:rsid="005e966a" style:font-weight-asian="bold" style:font-weight-complex="bold"/>
    </style:style>
    <style:style style:name="T88" style:family="text">
      <style:text-properties officeooo:rsid="00440a47"/>
    </style:style>
    <style:style style:name="T89" style:family="text">
      <style:text-properties officeooo:rsid="00564d5c"/>
    </style:style>
    <style:style style:name="T90" style:family="text">
      <style:text-properties fo:font-weight="bold" officeooo:rsid="0047727a" style:font-weight-asian="bold" style:font-weight-complex="bold"/>
    </style:style>
    <style:style style:name="T91" style:family="text">
      <style:text-properties fo:font-weight="normal" officeooo:rsid="0047727a" style:font-weight-asian="normal" style:font-weight-complex="normal"/>
    </style:style>
    <style:style style:name="T92" style:family="text">
      <style:text-properties fo:font-weight="normal" officeooo:rsid="0063f0aa" style:font-weight-asian="normal" style:font-weight-complex="normal"/>
    </style:style>
    <style:style style:name="T93" style:family="text">
      <style:text-properties fo:font-weight="normal" officeooo:rsid="016a6d8f" style:font-weight-asian="normal" style:font-weight-complex="normal"/>
    </style:style>
    <style:style style:name="T94" style:family="text">
      <style:text-properties officeooo:rsid="014362f7"/>
    </style:style>
    <style:style style:name="T95" style:family="text">
      <style:text-properties officeooo:rsid="01545a41"/>
    </style:style>
    <style:style style:name="T96" style:family="text">
      <style:text-properties fo:font-weight="bold" officeooo:rsid="0138112f" style:font-weight-asian="bold" style:font-weight-complex="bold"/>
    </style:style>
    <style:style style:name="T97" style:family="text">
      <style:text-properties officeooo:rsid="0047f5d9"/>
    </style:style>
    <style:style style:name="T98" style:family="text">
      <style:text-properties fo:font-weight="bold" officeooo:rsid="0047f5d9" style:font-weight-asian="bold" style:font-weight-complex="bold"/>
    </style:style>
    <style:style style:name="T99" style:family="text">
      <style:text-properties officeooo:rsid="013e1635"/>
    </style:style>
    <style:style style:name="T100" style:family="text">
      <style:text-properties officeooo:rsid="01565867"/>
    </style:style>
    <style:style style:name="T101" style:family="text">
      <style:text-properties officeooo:rsid="0156d8f0"/>
    </style:style>
    <style:style style:name="T102" style:family="text">
      <style:text-properties officeooo:rsid="014eed15"/>
    </style:style>
    <style:style style:name="T103" style:family="text">
      <style:text-properties officeooo:rsid="0166c22a"/>
    </style:style>
    <style:style style:name="T104" style:family="text">
      <style:text-properties officeooo:rsid="01500c83"/>
    </style:style>
    <style:style style:name="T105" style:family="text">
      <style:text-properties officeooo:rsid="0138112f"/>
    </style:style>
    <style:style style:name="T106" style:family="text">
      <style:text-properties fo:font-weight="bold" officeooo:rsid="0156d8f0" style:font-weight-asian="bold" style:font-weight-complex="bold"/>
    </style:style>
    <style:style style:name="T107" style:family="text">
      <style:text-properties officeooo:rsid="01afd126"/>
    </style:style>
    <style:style style:name="T108" style:family="text">
      <style:text-properties officeooo:rsid="01724073"/>
    </style:style>
    <style:style style:name="T109" style:family="text">
      <style:text-properties fo:font-weight="bold" officeooo:rsid="016c9783" style:font-weight-asian="bold" style:font-weight-complex="bold"/>
    </style:style>
    <style:style style:name="T110" style:family="text">
      <style:text-properties fo:font-weight="bold" officeooo:rsid="01935a1b" style:font-weight-asian="bold" style:font-weight-complex="bold"/>
    </style:style>
    <style:style style:name="T111" style:family="text">
      <style:text-properties officeooo:rsid="01ae5c75"/>
    </style:style>
    <style:style style:name="T112" style:family="text">
      <style:text-properties officeooo:rsid="0178eb50"/>
    </style:style>
    <style:style style:name="T113" style:family="text">
      <style:text-properties officeooo:rsid="015a173c"/>
    </style:style>
    <style:style style:name="T114" style:family="text">
      <style:text-properties officeooo:rsid="0161b44c"/>
    </style:style>
    <style:style style:name="T115" style:family="text">
      <style:text-properties officeooo:rsid="01621942"/>
    </style:style>
    <style:style style:name="T116" style:family="text">
      <style:text-properties officeooo:rsid="01378e1e"/>
    </style:style>
    <style:style style:name="T117" style:family="text">
      <style:text-properties officeooo:rsid="0149159c"/>
    </style:style>
    <style:style style:name="T118" style:family="text">
      <style:text-properties officeooo:rsid="0139d8b7"/>
    </style:style>
    <style:style style:name="T119" style:family="text">
      <style:text-properties officeooo:rsid="0191744c"/>
    </style:style>
    <style:style style:name="T120" style:family="text">
      <style:text-properties officeooo:rsid="0176f03b"/>
    </style:style>
    <style:style style:name="T121" style:family="text">
      <style:text-properties fo:font-weight="bold" officeooo:rsid="0176f03b" style:font-weight-asian="bold" style:font-weight-complex="bold"/>
    </style:style>
    <style:style style:name="T122" style:family="text">
      <style:text-properties fo:font-weight="bold" officeooo:rsid="017a0c84" style:font-weight-asian="bold" style:font-weight-complex="bold"/>
    </style:style>
    <style:style style:name="T123" style:family="text">
      <style:text-properties officeooo:rsid="017a0c84"/>
    </style:style>
    <style:style style:name="T124" style:family="text">
      <style:text-properties officeooo:rsid="0175744b"/>
    </style:style>
    <style:style style:name="T125" style:family="text">
      <style:text-properties fo:font-weight="normal" officeooo:rsid="0138112f" style:font-weight-asian="normal" style:font-weight-complex="normal"/>
    </style:style>
    <style:style style:name="T126" style:family="text">
      <style:text-properties fo:font-weight="normal" officeooo:rsid="0175744b" style:font-weight-asian="normal" style:font-weight-complex="normal"/>
    </style:style>
    <style:style style:name="T127" style:family="text">
      <style:text-properties fo:font-weight="normal" officeooo:rsid="014a61dd" style:font-weight-asian="normal" style:font-weight-complex="normal"/>
    </style:style>
    <style:style style:name="T128" style:family="text">
      <style:text-properties officeooo:rsid="015cf4ba"/>
    </style:style>
    <style:style style:name="T129" style:family="text">
      <style:text-properties officeooo:rsid="015e8797"/>
    </style:style>
    <style:style style:name="T130" style:family="text">
      <style:text-properties fo:font-weight="bold" officeooo:rsid="0160cb92" style:font-weight-asian="bold" style:font-weight-complex="bold"/>
    </style:style>
    <style:style style:name="T131" style:family="text">
      <style:text-properties officeooo:rsid="0160cb92"/>
    </style:style>
    <style:style style:name="T132" style:family="text">
      <style:text-properties officeooo:rsid="015bab5b"/>
    </style:style>
    <style:style style:name="T133" style:family="text">
      <style:text-properties fo:font-weight="bold" officeooo:rsid="015bab5b" style:font-weight-asian="bold" style:font-weight-complex="bold"/>
    </style:style>
    <style:style style:name="T134" style:family="text">
      <style:text-properties officeooo:rsid="0161eedd"/>
    </style:style>
    <style:style style:name="T135" style:family="text">
      <style:text-properties officeooo:rsid="00ed50f7"/>
    </style:style>
    <style:style style:name="T136" style:family="text">
      <style:text-properties officeooo:rsid="00d54840"/>
    </style:style>
    <style:style style:name="T137" style:family="text">
      <style:text-properties officeooo:rsid="00d65bfd"/>
    </style:style>
    <style:style style:name="T138" style:family="text">
      <style:text-properties officeooo:rsid="00e9a33d"/>
    </style:style>
    <style:style style:name="T139" style:family="text">
      <style:text-properties style:text-position="super 58%" officeooo:rsid="00d54840"/>
    </style:style>
    <style:style style:name="T140" style:family="text">
      <style:text-properties fo:font-weight="bold" officeooo:rsid="00d65bfd" style:font-weight-asian="bold" style:font-weight-complex="bold"/>
    </style:style>
    <style:style style:name="T141" style:family="text">
      <style:text-properties officeooo:rsid="01115f5d"/>
    </style:style>
    <style:style style:name="T142" style:family="text">
      <style:text-properties officeooo:rsid="00e2a4e5"/>
    </style:style>
    <style:style style:name="T143" style:family="text">
      <style:text-properties officeooo:rsid="00dbfc8b"/>
    </style:style>
    <style:style style:name="T144" style:family="text">
      <style:text-properties officeooo:rsid="00de81cb"/>
    </style:style>
    <style:style style:name="T145" style:family="text">
      <style:text-properties officeooo:rsid="00e489c0"/>
    </style:style>
    <style:style style:name="T146" style:family="text">
      <style:text-properties officeooo:rsid="00d788f6"/>
    </style:style>
    <style:style style:name="T147" style:family="text">
      <style:text-properties officeooo:rsid="00d901fc"/>
    </style:style>
    <style:style style:name="T148" style:family="text">
      <style:text-properties officeooo:rsid="00da610e"/>
    </style:style>
    <style:style style:name="T149" style:family="text">
      <style:text-properties officeooo:rsid="00e702aa"/>
    </style:style>
    <style:style style:name="T150" style:family="text">
      <style:text-properties officeooo:rsid="00ead144"/>
    </style:style>
    <style:style style:name="T151" style:family="text">
      <style:text-properties officeooo:rsid="00fb71af"/>
    </style:style>
    <style:style style:name="T152" style:family="text">
      <style:text-properties officeooo:rsid="00e1d1bc"/>
    </style:style>
    <style:style style:name="T153" style:family="text">
      <style:text-properties style:text-position="super 58%" officeooo:rsid="00e1d1bc"/>
    </style:style>
    <style:style style:name="T154" style:family="text">
      <style:text-properties officeooo:rsid="00ecbf12"/>
    </style:style>
    <style:style style:name="T155" style:family="text">
      <style:text-properties officeooo:rsid="00e85462"/>
    </style:style>
    <style:style style:name="T156" style:family="text">
      <style:text-properties officeooo:rsid="00fd22f2"/>
    </style:style>
    <style:style style:name="T157" style:family="text">
      <style:text-properties officeooo:rsid="0113ccf9"/>
    </style:style>
    <style:style style:name="T158" style:family="text">
      <style:text-properties officeooo:rsid="00f89c14"/>
    </style:style>
    <style:style style:name="T159" style:family="text">
      <style:text-properties style:text-position="super 58%" officeooo:rsid="00f89c14"/>
    </style:style>
    <style:style style:name="T160" style:family="text">
      <style:text-properties officeooo:rsid="00fd79c1"/>
    </style:style>
    <style:style style:name="T161" style:family="text">
      <style:text-properties officeooo:rsid="00f98bae"/>
    </style:style>
    <style:style style:name="T162" style:family="text">
      <style:text-properties officeooo:rsid="011b32bd"/>
    </style:style>
    <style:style style:name="T163" style:family="text">
      <style:text-properties officeooo:rsid="00fe0199"/>
    </style:style>
    <style:style style:name="T164" style:family="text">
      <style:text-properties officeooo:rsid="00ff7c65"/>
    </style:style>
    <style:style style:name="T165" style:family="text">
      <style:text-properties fo:font-weight="bold" officeooo:rsid="00f98bae" style:font-weight-asian="bold" style:font-weight-complex="bold"/>
    </style:style>
    <style:style style:name="T166" style:family="text">
      <style:text-properties officeooo:rsid="0103425e"/>
    </style:style>
    <style:style style:name="T167" style:family="text">
      <style:text-properties officeooo:rsid="01034c8e"/>
    </style:style>
    <style:style style:name="T168" style:family="text">
      <style:text-properties officeooo:rsid="010720be"/>
    </style:style>
    <style:style style:name="T169" style:family="text">
      <style:text-properties officeooo:rsid="0104bdcd"/>
    </style:style>
    <style:style style:name="T170" style:family="text">
      <style:text-properties officeooo:rsid="0104fca7"/>
    </style:style>
    <style:style style:name="T171" style:family="text">
      <style:text-properties fo:font-weight="bold" officeooo:rsid="0104fca7" style:font-weight-asian="bold" style:font-weight-complex="bold"/>
    </style:style>
    <style:style style:name="T172" style:family="text">
      <style:text-properties officeooo:rsid="0109d61e"/>
    </style:style>
    <style:style style:name="T173" style:family="text">
      <style:text-properties fo:font-weight="bold" officeooo:rsid="0109d61e" style:font-weight-asian="bold" style:font-weight-complex="bold"/>
    </style:style>
    <style:style style:name="T174" style:family="text">
      <style:text-properties officeooo:rsid="0116760f"/>
    </style:style>
    <style:style style:name="T175" style:family="text">
      <style:text-properties officeooo:rsid="010b5134"/>
    </style:style>
    <style:style style:name="T176" style:family="text">
      <style:text-properties officeooo:rsid="011b4494"/>
    </style:style>
    <style:style style:name="T177" style:family="text">
      <style:text-properties style:text-underline-style="solid" style:text-underline-width="auto" style:text-underline-color="font-color" officeooo:rsid="010b5134"/>
    </style:style>
    <style:style style:name="T178" style:family="text">
      <style:text-properties style:text-position="super 58%" style:text-underline-style="solid" style:text-underline-width="auto" style:text-underline-color="font-color" officeooo:rsid="010b5134"/>
    </style:style>
    <style:style style:name="T179" style:family="text">
      <style:text-properties officeooo:rsid="011f0d0f"/>
    </style:style>
    <style:style style:name="T180" style:family="text">
      <style:text-properties officeooo:rsid="010e37de"/>
    </style:style>
    <style:style style:name="T181" style:family="text">
      <style:text-properties officeooo:rsid="00f2c16e"/>
    </style:style>
    <style:style style:name="T182" style:family="text">
      <style:text-properties officeooo:rsid="009560f3"/>
    </style:style>
    <style:style style:name="T183" style:family="text">
      <style:text-properties officeooo:rsid="00970659"/>
    </style:style>
    <style:style style:name="T184" style:family="text">
      <style:text-properties officeooo:rsid="00f3bef2"/>
    </style:style>
    <style:style style:name="T185" style:family="text">
      <style:text-properties style:text-position="super 58%" officeooo:rsid="00f3bef2"/>
    </style:style>
    <style:style style:name="T186" style:family="text">
      <style:text-properties officeooo:rsid="00f7e0f9"/>
    </style:style>
    <style:style style:name="T187" style:family="text">
      <style:text-properties style:text-position="super 58%" officeooo:rsid="00f7e0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Exodus itinerary</text:p>
      <text:p text:style-name="P2">Note: all date <text:span text:style-name="T1">and time-elapsed </text:span>calculations are based on the 360 day per year Biblical calendar.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3"><text:span text:style-name="Strong_20_Emphasis"><text:span text:style-name="T2">Reference(s)</text:span></text:span></text:p>
            </table:table-cell>
            <table:table-cell table:style-name="Table1.A1" office:value-type="string">
              <text:p text:style-name="P3"><text:span text:style-name="Strong_20_Emphasis"><text:span text:style-name="T2">Date / Time Elapsed</text:span></text:span></text:p>
            </table:table-cell>
            <table:table-cell table:style-name="Table1.C1" table:number-columns-spanned="2" office:value-type="string">
              <text:p text:style-name="P3"><text:span text:style-name="Strong_20_Emphasis"><text:span text:style-name="T2">Notes</text:span></text:span>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4">Exodus 12:<text:span text:style-name="T3">37,</text:span>51</text:p>
            <text:p text:style-name="P4">Numbers 33:3-5</text:p>
          </table:table-cell>
          <table:table-cell table:style-name="Table1.B2" office:value-type="string">
            <text:p text:style-name="P5">(1st Year), 1st Month, 15th Day</text:p>
          </table:table-cell>
          <table:table-cell table:style-name="Table1.C2" table:number-columns-spanned="2" office:value-type="string">
            <text:p text:style-name="Table_20_Contents"><text:span text:style-name="T4">Rameses</text:span> → <text:span text:style-name="T4">Succoth</text:span></text:p>
            <text:p text:style-name="Table_20_Contents"/>
            <text:p text:style-name="Table_20_Contents">Departure from Egypt on the morrow after the Passover.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4">Exodus 13:20</text:p>
            <text:p text:style-name="P4">Numbers 33:6</text:p>
          </table:table-cell>
          <table:table-cell table:style-name="Table1.B3" office:value-type="string">
            <text:p text:style-name="P5"/>
          </table:table-cell>
          <table:table-cell table:style-name="Table1.C3" table:number-columns-spanned="2" office:value-type="string">
            <text:p text:style-name="Table_20_Contents"><text:span text:style-name="T4">Succoth</text:span> → <text:span text:style-name="T4">Etham</text:span> (in the edge of the wilderness)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P4">Exodus 13:20, 14:2-9</text:p>
            <text:p text:style-name="P4">Numbers 33:7</text:p>
          </table:table-cell>
          <table:table-cell table:style-name="Table1.B4" office:value-type="string">
            <text:p text:style-name="P5"/>
          </table:table-cell>
          <table:table-cell table:style-name="Table1.C4" table:number-columns-spanned="2" office:value-type="string">
            <text:p text:style-name="Table_20_Contents"><text:span text:style-name="T4">Etham</text:span> → <text:span text:style-name="T4">Pi-hahiroth</text:span> (before Migdol, over against Baal-zephon)</text:p>
          </table:table-cell>
          <table:covered-table-cell/>
        </table:table-row>
        <table:table-row table:style-name="Table1.1">
          <table:table-cell table:style-name="Table1.A5" office:value-type="string">
            <text:p text:style-name="P6">Exodus <text:span text:style-name="T5">14:21,24,27</text:span></text:p>
            <text:p text:style-name="P7">Psalm 136:15</text:p>
          </table:table-cell>
          <table:table-cell table:style-name="Table1.B5" office:value-type="string">
            <text:p text:style-name="P8">1 day elapsed</text:p>
          </table:table-cell>
          <table:table-cell table:style-name="Table1.C5" table:number-columns-spanned="2" office:value-type="string">
            <text:p text:style-name="Table_20_Contents"><text:span text:style-name="T4">Pi-hahiroth</text:span> → <text:span text:style-name="T6">Red sea</text:span></text:p>
            <text:p text:style-name="Table_20_Contents"/>
            <text:p text:style-name="P9">The children of Israel cross on dry ground. Phar<text:span text:style-name="T7">ao</text:span>h and his host drown in the Red se<text:span text:style-name="T8">a.</text:span></text:p>
          </table:table-cell>
          <table:covered-table-cell/>
        </table:table-row>
        <table:table-row table:style-name="Table1.1">
          <table:table-cell table:style-name="Table1.A5" office:value-type="string">
            <text:p text:style-name="P10">Exodus 15:22,<text:span text:style-name="T9">23</text:span></text:p>
            <text:p text:style-name="P11">Numbers 33:8</text:p>
          </table:table-cell>
          <table:table-cell table:style-name="Table1.B5" office:value-type="string">
            <text:p text:style-name="P5"/>
          </table:table-cell>
          <table:table-cell table:style-name="Table1.C5" table:number-columns-spanned="2" office:value-type="string">
            <text:p text:style-name="P12"><text:span text:style-name="T4">Red sea</text:span> → <text:span text:style-name="T4">Marah</text:span><text:span text:style-name="T10"> (three days journey in the wilderness of Etham /</text:span><text:span text:style-name="T11"> Shur</text:span><text:span text:style-name="T10">)</text:span></text:p>
            <text:p text:style-name="P13"/>
            <text:p text:style-name="P14">Both Etham &amp; Shur refer to the exact same region <text:span text:style-name="T12">(wilderness of) </text:span>from two different perspectives. The <text:span text:style-name="T4">fortress</text:span> line at Etham is at the edge of the border of Egypt and the desert and Shur is the Hebrew word for “the <text:span text:style-name="T4">wall</text:span>” <text:span text:style-name="T13">(H7791)</text:span>. Technically, Etham is within Shur.</text:p>
          </table:table-cell>
          <table:covered-table-cell/>
        </table:table-row>
        <table:table-row table:style-name="Table1.1">
          <table:table-cell table:style-name="Table1.A7" office:value-type="string">
            <text:p text:style-name="P6">Exodus 15:<text:span text:style-name="T14">13,</text:span>27</text:p>
            <text:p text:style-name="P6">Numbers 33:9</text:p>
          </table:table-cell>
          <table:table-cell table:style-name="Table1.B7" office:value-type="string">
            <text:p text:style-name="P5"/>
          </table:table-cell>
          <table:table-cell table:style-name="Table1.C7" table:number-columns-spanned="2" office:value-type="string">
            <text:p text:style-name="Table_20_Contents"><text:span text:style-name="T4">Marah</text:span> → <text:span text:style-name="T4">Elim</text:span> (twelve <text:span text:style-name="T15">wells/</text:span>fountains of water <text:span text:style-name="T16">and seventy </text:span>palm trees)</text:p>
          </table:table-cell>
          <table:covered-table-cell/>
        </table:table-row>
        <table:table-row table:style-name="Table1.1">
          <table:table-cell table:style-name="Table1.A8" office:value-type="string">
            <text:p text:style-name="P5">Numbers 33:10</text:p>
          </table:table-cell>
          <table:table-cell table:style-name="Table1.B8" office:value-type="string">
            <text:p text:style-name="P5"/>
          </table:table-cell>
          <table:table-cell table:style-name="Table1.C8" table:number-columns-spanned="2" office:value-type="string">
            <text:p text:style-name="Table_20_Contents"><text:span text:style-name="T4">Elim</text:span> → Encampment by the <text:span text:style-name="T4">Red Sea</text:span>.</text:p>
          </table:table-cell>
          <table:covered-table-cell/>
        </table:table-row>
        <table:table-row table:style-name="Table1.1">
          <table:table-cell table:style-name="Table1.A9" office:value-type="string">
            <text:p text:style-name="P5">Numbers 33:11</text:p>
          </table:table-cell>
          <table:table-cell table:style-name="Table1.B9" office:value-type="string">
            <text:p text:style-name="P5"/>
          </table:table-cell>
          <table:table-cell table:style-name="Table1.C9" table:number-columns-spanned="2" office:value-type="string">
            <text:p text:style-name="Table_20_Contents">By the <text:span text:style-name="T4">Red Sea</text:span> → Wilderness of <text:span text:style-name="T4">Sin</text:span>.</text:p>
          </table:table-cell>
          <table:covered-table-cell/>
        </table:table-row>
        <table:table-row table:style-name="Table1.1">
          <table:table-cell table:style-name="Table1.A10" office:value-type="string">
            <text:p text:style-name="P5">Exodus 16:1,<text:span text:style-name="T17">35</text:span></text:p>
          </table:table-cell>
          <table:table-cell table:style-name="Table1.B10" office:value-type="string">
            <text:p text:style-name="P5">(1st Year), 2nd Month, 15th Day</text:p>
            <text:p text:style-name="P5"/>
            <text:p text:style-name="P5">(1 month elapsed)</text:p>
          </table:table-cell>
          <table:table-cell table:style-name="Table1.C10" table:number-columns-spanned="2" office:value-type="string">
            <text:p text:style-name="Table_20_Contents">Wilderness of <text:span text:style-name="T4">Sin</text:span> (between Elim and Sinai). Manna given.</text:p>
          </table:table-cell>
          <table:covered-table-cell/>
        </table:table-row>
        <table:table-row table:style-name="Table1.1">
          <table:table-cell table:style-name="Table1.A11" office:value-type="string">
            <text:p text:style-name="P5">Numbers 33:12</text:p>
          </table:table-cell>
          <table:table-cell table:style-name="Table1.B11" office:value-type="string">
            <text:p text:style-name="P5"/>
          </table:table-cell>
          <table:table-cell table:style-name="Table1.C11" table:number-columns-spanned="2" office:value-type="string">
            <text:p text:style-name="Table_20_Contents">Wilderness of <text:span text:style-name="T4">Sin</text:span> → <text:span text:style-name="T4">Dophkah</text:span>.</text:p>
          </table:table-cell>
          <table:covered-table-cell/>
        </table:table-row>
        <table:table-row table:style-name="Table1.1">
          <table:table-cell table:style-name="Table1.A12" office:value-type="string">
            <text:p text:style-name="P5">Numbers 33:13</text:p>
          </table:table-cell>
          <table:table-cell table:style-name="Table1.B12" office:value-type="string">
            <text:p text:style-name="P5"/>
          </table:table-cell>
          <table:table-cell table:style-name="Table1.C12" table:number-columns-spanned="2" office:value-type="string">
            <text:p text:style-name="Table_20_Contents"><text:span text:style-name="T4">Dophkah</text:span> → <text:span text:style-name="T4">Alush</text:span>.</text:p>
          </table:table-cell>
          <table:covered-table-cell/>
        </table:table-row>
        <table:table-row table:style-name="Table1.1">
          <table:table-cell table:style-name="Table1.A13" office:value-type="string">
            <text:p text:style-name="P6">Exodus 17:1-<text:span text:style-name="T18">13</text:span>, 18:<text:span text:style-name="T19">1-7</text:span></text:p>
            <text:p text:style-name="P6">Numbers 33:14</text:p>
          </table:table-cell>
          <table:table-cell table:style-name="Table1.B13" office:value-type="string">
            <text:p text:style-name="P5"/>
          </table:table-cell>
          <table:table-cell table:style-name="Table1.C13" table:number-columns-spanned="2" office:value-type="string">
            <text:p text:style-name="P15"><text:span text:style-name="T4">Alush</text:span> → <text:span text:style-name="T4">Rephidim</text:span> (in Horeb)</text:p>
            <text:p text:style-name="P15"/>
            <text:p text:style-name="P15">No water; rock smitten; Massah &amp; Meribah. Amalek fights Israel. Jethro visits Moses. <text:span text:style-name="T20">Zipporah returns.</text:span></text:p>
          </table:table-cell>
          <table:covered-table-cell/>
        </table:table-row>
        <text:soft-page-break/>
        <table:table-row table:style-name="Table1.1">
          <table:table-cell table:style-name="Table1.A14" office:value-type="string">
            <text:p text:style-name="P6">Exodus 19:1-2</text:p>
            <text:p text:style-name="P6">Numbers 33:15</text:p>
            <text:p text:style-name="P6">Deut<text:span text:style-name="T21">eronomy</text:span> 1:19</text:p>
            <text:p text:style-name="P6">1 Kings 19:8</text:p>
          </table:table-cell>
          <table:table-cell table:style-name="Table1.B14" office:value-type="string">
            <text:p text:style-name="P5">(1st Year), 3rd Month, 15th Day</text:p>
            <text:p text:style-name="P5"/>
            <text:p text:style-name="P5">(2 months elapsed)</text:p>
          </table:table-cell>
          <table:table-cell table:style-name="Table1.C14" table:number-columns-spanned="2" office:value-type="string">
            <text:p text:style-name="P16"><text:span text:style-name="T4">Rephidim</text:span> → Wilderness of <text:span text:style-name="T4">Sinai</text:span> (Desert of Sinai; Mount Horeb; the mount of God)</text:p>
            <text:p text:style-name="P16"/>
            <text:p text:style-name="P16">The giving of the Law.</text:p>
          </table:table-cell>
          <table:covered-table-cell/>
        </table:table-row>
        <table:table-row table:style-name="Table1.1">
          <table:table-cell table:style-name="Table1.A15" office:value-type="string">
            <text:p text:style-name="P5">Exodus 40:2, 17</text:p>
          </table:table-cell>
          <table:table-cell table:style-name="Table1.B15" office:value-type="string">
            <text:p text:style-name="P5">2nd Year, 1st Month, 1st Day</text:p>
          </table:table-cell>
          <table:table-cell table:style-name="Table1.C15" table:number-columns-spanned="2" office:value-type="string">
            <text:p text:style-name="Table_20_Contents">Tabernacle <text:span text:style-name="T22">r</text:span>eared.</text:p>
          </table:table-cell>
          <table:covered-table-cell/>
        </table:table-row>
        <table:table-row table:style-name="Table1.1">
          <table:table-cell table:style-name="Table1.A15" office:value-type="string">
            <text:p text:style-name="P5">Numbers 1:1, 18</text:p>
          </table:table-cell>
          <table:table-cell table:style-name="Table1.B16" office:value-type="string">
            <text:p text:style-name="P5">2nd Year, 2nd Month, 1st Day</text:p>
          </table:table-cell>
          <table:table-cell table:style-name="Table1.C16" table:number-columns-spanned="2" office:value-type="string">
            <text:p text:style-name="Table_20_Contents">The <text:span text:style-name="T22">c</text:span>ensus taken in the wilderness of <text:span text:style-name="T4">Sinai</text:span>.</text:p>
          </table:table-cell>
          <table:covered-table-cell/>
        </table:table-row>
        <table:table-row table:style-name="Table1.1">
          <table:table-cell table:style-name="Table1.A17" office:value-type="string">
            <text:p text:style-name="P17">Numbers 10:11-<text:span text:style-name="T23">12</text:span>,<text:span text:style-name="T24">33, 11:</text:span><text:span text:style-name="T25">1-3, </text:span><text:span text:style-name="T24">4-34</text:span></text:p>
            <text:p text:style-name="P18">Deuteronomy 9:22</text:p>
            <text:p text:style-name="P18">Numbers 33:16</text:p>
          </table:table-cell>
          <table:table-cell table:style-name="Table1.B17" office:value-type="string">
            <text:p text:style-name="P5">2nd Year, 2nd Month, 20th Day</text:p>
            <text:p text:style-name="P5"/>
            <text:p text:style-name="P18">3 days journey</text:p>
            <text:p text:style-name="P18"/>
            <text:p text:style-name="P18">2 days (quail falls)</text:p>
            <text:p text:style-name="P18"/>
            <text:p text:style-name="P18"><text:span text:style-name="T26">At least</text:span> 1 month elapsed <text:span text:style-name="T26">(Num 11:19,20)</text:span></text:p>
          </table:table-cell>
          <table:table-cell table:style-name="Table1.C17" office:value-type="string">
            <text:p text:style-name="P19">Wilderness of <text:span text:style-name="T4">Sinai</text:span> → Wilderness of <text:span text:style-name="T4">Paran</text:span></text:p>
            <text:p text:style-name="P19"/>
            <text:p text:style-name="P19">The <text:span text:style-name="T22">c</text:span>loud is taken up. Israel officially begins marching away from Sinai.</text:p>
          </table:table-cell>
          <table:table-cell table:style-name="Table1.D17" office:value-type="string">
            <text:p text:style-name="P20">Wilderness of <text:span text:style-name="T4">Sinai</text:span> → <text:span text:style-name="T4">Taberah</text:span> → <text:span text:style-name="T4">Kibroth-hattaavah</text:span><text:span text:style-name="T10"> (</text:span><text:span text:style-name="T27">both </text:span><text:span text:style-name="T10">in </text:span><text:span text:style-name="T28">the wilderness of </text:span><text:span text:style-name="T10">Paran)</text:span></text:p>
            <text:p text:style-name="P21"/>
            <text:p text:style-name="P22">Ark goes before them. The fire of the LORD burns at the uttermost parts of the camp.</text:p>
            <text:p text:style-name="P22"/>
            <text:p text:style-name="P22">The people lust for flesh. Quail is given for a whole month. Great plague strikes the people.</text:p>
          </table:table-cell>
        </table:table-row>
        <table:table-row table:style-name="Table1.1">
          <table:table-cell table:style-name="Table1.A18" office:value-type="string">
            <text:p text:style-name="P23">Numbers 11:35, 33:17</text:p>
            <text:p text:style-name="P23">Deuteronomy 1:1</text:p>
          </table:table-cell>
          <table:table-cell table:style-name="Table1.B18" office:value-type="string">
            <text:p text:style-name="P5"/>
          </table:table-cell>
          <table:table-cell table:style-name="Table1.C18" table:number-columns-spanned="2" office:value-type="string">
            <text:p text:style-name="Table_20_Contents"><text:span text:style-name="T4">Kibroth-hattaavah</text:span> → <text:span text:style-name="T4">Hazeroth</text:span>.</text:p>
          </table:table-cell>
          <table:covered-table-cell/>
        </table:table-row>
        <table:table-row table:style-name="Table1.1">
          <table:table-cell table:style-name="Table1.A18" office:value-type="string">
            <text:p text:style-name="P5">Numbers 12:14</text:p>
          </table:table-cell>
          <table:table-cell table:style-name="Table1.B19" office:value-type="string">
            <text:p text:style-name="P5">7 days elapsed</text:p>
          </table:table-cell>
          <table:table-cell table:style-name="Table1.C19" table:number-columns-spanned="2" office:value-type="string">
            <text:p text:style-name="P24">Hazeroth</text:p>
            <text:p text:style-name="P24"/>
            <text:p text:style-name="P25">Miriam's <text:span text:style-name="T29">leprosy.</text:span></text:p>
          </table:table-cell>
          <table:covered-table-cell/>
        </table:table-row>
        <table:table-row table:style-name="Table1.1">
          <table:table-cell table:style-name="Table1.A20" office:value-type="string">
            <text:p text:style-name="P23">Numbers 12:16, 33:18</text:p>
            <text:p text:style-name="P23">Gen<text:span text:style-name="T30">esis</text:span> 14:7</text:p>
            <text:p text:style-name="P23">Deut<text:span text:style-name="T30">eronomy</text:span> 1:19-20</text:p>
            <text:p text:style-name="P23">Joshua 14:7</text:p>
          </table:table-cell>
          <table:table-cell table:style-name="Table1.B20" office:value-type="string">
            <text:p text:style-name="P5">Travel time from Hazeroth</text:p>
          </table:table-cell>
          <table:table-cell table:style-name="Table1.C20" table:number-columns-spanned="2" office:value-type="string">
            <text:p text:style-name="P26"><text:span text:style-name="T4">Hazeroth</text:span> → <text:span text:style-name="T4">Rithmah</text:span> (in the wilderness of <text:span text:style-name="T4">Paran</text:span>; <text:span text:style-name="T4">Kadesh</text:span>; <text:span text:style-name="T4">Kadesh-barnea</text:span>; mountain of the Amorites)</text:p>
            <text:p text:style-name="P26"/>
            <text:p text:style-name="P26">Encampment is established at the border.</text:p>
          </table:table-cell>
          <table:covered-table-cell/>
        </table:table-row>
        <table:table-row table:style-name="Table1.1">
          <table:table-cell table:style-name="Table1.A20" office:value-type="string">
            <text:p text:style-name="P5">Numbers 13:25-26</text:p>
            <text:p text:style-name="P27">Deuteronomy 1:44,<text:span text:style-name="T31">46</text:span></text:p>
          </table:table-cell>
          <table:table-cell table:style-name="Table1.B21" office:value-type="string">
            <text:p text:style-name="P5">40 days elapsed</text:p>
            <text:p text:style-name="P5"/>
            <text:p text:style-name="P28">(earliest: 2<text:span text:style-name="T32">nd</text:span> year, 5<text:span text:style-name="T32">th</text:span> month, 10<text:span text:style-name="T32">th</text:span> day)</text:p>
          </table:table-cell>
          <table:table-cell table:style-name="Table1.C21" table:number-columns-spanned="2" office:value-type="string">
            <text:p text:style-name="Table_20_Contents">Twelve spies sent to survey the north. They return to the camp at <text:span text:style-name="T4">Kadesh</text:span> with their report after 40 days. <text:span text:style-name="T33">Failed military compaign </text:span><text:span text:style-name="T34">against Amorites </text:span><text:span text:style-name="T33">on Mount Seir.</text:span></text:p>
          </table:table-cell>
          <table:covered-table-cell/>
        </table:table-row>
        <table:table-row table:style-name="Table1.1">
          <table:table-cell table:style-name="Table1.A20" office:value-type="string">
            <text:p text:style-name="P5">Numbers 14:1</text:p>
          </table:table-cell>
          <table:table-cell table:style-name="Table1.B22" office:value-type="string">
            <text:p text:style-name="P5">1 night elapsed</text:p>
          </table:table-cell>
          <table:table-cell table:style-name="Table1.C22" table:number-columns-spanned="2" office:value-type="string">
            <text:p text:style-name="Table_20_Contents">The <text:span text:style-name="T35">c</text:span>amp <text:span text:style-name="T35">w</text:span>eeps. The congregation lifts up their voice and weeps that night after hearing the report of the 10 unfaithful spies.</text:p>
          </table:table-cell>
          <table:covered-table-cell/>
        </table:table-row>
        <text:soft-page-break/>
        <table:table-row table:style-name="Table1.1">
          <table:table-cell table:style-name="Table1.A20" office:value-type="string">
            <text:p text:style-name="P5">Numbers 14:20-34</text:p>
          </table:table-cell>
          <table:table-cell table:style-name="Table1.B23" office:value-type="string">
            <text:p text:style-name="P29">Estimated date:</text:p>
            <text:p text:style-name="P29"/>
            <text:p text:style-name="P30"><text:span text:style-name="T36">2</text:span><text:span text:style-name="T37">nd</text:span> <text:span text:style-name="T36">year, 5</text:span><text:span text:style-name="T37">th</text:span> <text:span text:style-name="T36">month</text:span></text:p>
            <text:p text:style-name="P29"/>
            <text:p text:style-name="P31">(~1 year, 4 months elapsed)</text:p>
          </table:table-cell>
          <table:table-cell table:style-name="Table1.C23" table:number-columns-spanned="2" office:value-type="string">
            <text:p text:style-name="Table_20_Contents">The Judgment Pronounced. The 40-year wandering sentence begins. All those 20 years and older (except Caleb &amp; Joshua) are condemned to die in the wilderness.</text:p>
            <text:p text:style-name="Table_20_Contents"/>
            <text:p text:style-name="P32">Deu 1:22,23 – Grapes <text:span text:style-name="T38">begin to ripen in the fourth month</text:span>.</text:p>
          </table:table-cell>
          <table:covered-table-cell/>
        </table:table-row>
        <table:table-row table:style-name="Table1.1">
          <table:table-cell table:style-name="Table1.A24" office:value-type="string">
            <text:p text:style-name="P33">Numbers 33:19</text:p>
          </table:table-cell>
          <table:table-cell table:style-name="Table1.B24" office:value-type="string">
            <text:p text:style-name="P5"/>
          </table:table-cell>
          <table:table-cell table:style-name="Table1.C24" table:number-columns-spanned="2" office:value-type="string">
            <text:p text:style-name="P34"><text:span text:style-name="T4">Rithmah</text:span> → <text:span text:style-name="T4">Rimmon-p</text:span><text:span text:style-name="T39">a</text:span><text:span text:style-name="T4">rez</text:span></text:p>
          </table:table-cell>
          <table:covered-table-cell/>
        </table:table-row>
        <table:table-row table:style-name="Table1.1">
          <table:table-cell table:style-name="Table1.A24" office:value-type="string">
            <text:p text:style-name="P35">Numbers 33:20</text:p>
          </table:table-cell>
          <table:table-cell table:style-name="Table1.B25" office:value-type="string">
            <text:p text:style-name="P5"/>
          </table:table-cell>
          <table:table-cell table:style-name="Table1.C25" table:number-columns-spanned="2" office:value-type="string">
            <text:p text:style-name="P36"><text:span text:style-name="T4">Rimmon-parez</text:span> → <text:span text:style-name="T4">Libnah</text:span></text:p>
            <text:p text:style-name="Table_20_Contents"/>
            <text:p text:style-name="P37">Not the same Libnah of Judah, <text:span text:style-name="T40">a city of refuge given to the children of Aaron </text:span>(Joshua 15:42, 21:13)</text:p>
          </table:table-cell>
          <table:covered-table-cell/>
        </table:table-row>
        <table:table-row table:style-name="Table1.1">
          <table:table-cell table:style-name="Table1.A24" office:value-type="string">
            <text:p text:style-name="P35">Numbers 33:21</text:p>
          </table:table-cell>
          <table:table-cell table:style-name="Table1.B26" office:value-type="string">
            <text:p text:style-name="P5"/>
          </table:table-cell>
          <table:table-cell table:style-name="Table1.C26" table:number-columns-spanned="2" office:value-type="string">
            <text:p text:style-name="P36"><text:span text:style-name="T4">Libnah</text:span> → <text:span text:style-name="T4">Rissah</text:span></text:p>
          </table:table-cell>
          <table:covered-table-cell/>
        </table:table-row>
        <table:table-row table:style-name="Table1.1">
          <table:table-cell table:style-name="Table1.A24" office:value-type="string">
            <text:p text:style-name="P35">Numbers 33:22</text:p>
          </table:table-cell>
          <table:table-cell table:style-name="Table1.B27" office:value-type="string">
            <text:p text:style-name="P5"/>
          </table:table-cell>
          <table:table-cell table:style-name="Table1.C27" table:number-columns-spanned="2" office:value-type="string">
            <text:p text:style-name="P36"><text:span text:style-name="T4">Rissah</text:span> → <text:span text:style-name="T4">Kehelathah</text:span></text:p>
          </table:table-cell>
          <table:covered-table-cell/>
        </table:table-row>
        <table:table-row table:style-name="Table1.1">
          <table:table-cell table:style-name="Table1.A24" office:value-type="string">
            <text:p text:style-name="P35">Numbers 33:23</text:p>
          </table:table-cell>
          <table:table-cell table:style-name="Table1.B28" office:value-type="string">
            <text:p text:style-name="P5"/>
          </table:table-cell>
          <table:table-cell table:style-name="Table1.C28" table:number-columns-spanned="2" office:value-type="string">
            <text:p text:style-name="P36"><text:span text:style-name="T4">Kehelatha</text:span><text:span text:style-name="T41">h</text:span> → <text:span text:style-name="T4">Mount</text:span> <text:span text:style-name="T4">Shapher</text:span></text:p>
          </table:table-cell>
          <table:covered-table-cell/>
        </table:table-row>
        <table:table-row table:style-name="Table1.1">
          <table:table-cell table:style-name="Table1.A24" office:value-type="string">
            <text:p text:style-name="P35">Numbers 33:24</text:p>
          </table:table-cell>
          <table:table-cell table:style-name="Table1.B29" office:value-type="string">
            <text:p text:style-name="P35"/>
          </table:table-cell>
          <table:table-cell table:style-name="Table1.C29" table:number-columns-spanned="2" office:value-type="string">
            <text:p text:style-name="P38"><text:span text:style-name="T42">Mount Shaph</text:span><text:span text:style-name="T41">e</text:span><text:span text:style-name="T42">r</text:span><text:span text:style-name="T43"> → </text:span><text:span text:style-name="T42">Haradah</text:span></text:p>
          </table:table-cell>
          <table:covered-table-cell/>
        </table:table-row>
        <table:table-row table:style-name="Table1.1">
          <table:table-cell table:style-name="Table1.A24" office:value-type="string">
            <text:p text:style-name="P35">Numbers 33:25</text:p>
          </table:table-cell>
          <table:table-cell table:style-name="Table1.B30" office:value-type="string">
            <text:p text:style-name="P5"/>
          </table:table-cell>
          <table:table-cell table:style-name="Table1.C30" table:number-columns-spanned="2" office:value-type="string">
            <text:p text:style-name="P38"><text:span text:style-name="T42">Haradah</text:span><text:span text:style-name="T43"> → </text:span><text:span text:style-name="T42">Makheloth</text:span></text:p>
          </table:table-cell>
          <table:covered-table-cell/>
        </table:table-row>
        <table:table-row table:style-name="Table1.1">
          <table:table-cell table:style-name="Table1.A24" office:value-type="string">
            <text:p text:style-name="P35">Numbers 33:26</text:p>
          </table:table-cell>
          <table:table-cell table:style-name="Table1.B31" office:value-type="string">
            <text:p text:style-name="P5"/>
          </table:table-cell>
          <table:table-cell table:style-name="Table1.C31" table:number-columns-spanned="2" office:value-type="string">
            <text:p text:style-name="P38"><text:span text:style-name="T42">Makheloth</text:span><text:span text:style-name="T43"> → </text:span><text:span text:style-name="T42">Tahath</text:span></text:p>
          </table:table-cell>
          <table:covered-table-cell/>
        </table:table-row>
        <table:table-row table:style-name="Table1.1">
          <table:table-cell table:style-name="Table1.A24" office:value-type="string">
            <text:p text:style-name="P35">Numbers 33:27</text:p>
          </table:table-cell>
          <table:table-cell table:style-name="Table1.B32" office:value-type="string">
            <text:p text:style-name="P5"/>
          </table:table-cell>
          <table:table-cell table:style-name="Table1.C32" table:number-columns-spanned="2" office:value-type="string">
            <text:p text:style-name="P39"><text:span text:style-name="T4">Tahath</text:span> → <text:span text:style-name="T4">Tarah</text:span></text:p>
          </table:table-cell>
          <table:covered-table-cell/>
        </table:table-row>
        <table:table-row table:style-name="Table1.1">
          <table:table-cell table:style-name="Table1.A24" office:value-type="string">
            <text:p text:style-name="P35">Numbers 33:28</text:p>
          </table:table-cell>
          <table:table-cell table:style-name="Table1.B33" office:value-type="string">
            <text:p text:style-name="P5"/>
          </table:table-cell>
          <table:table-cell table:style-name="Table1.C33" table:number-columns-spanned="2" office:value-type="string">
            <text:p text:style-name="P39"><text:span text:style-name="T4">Tarah</text:span> → <text:span text:style-name="T4">Mithcah</text:span></text:p>
          </table:table-cell>
          <table:covered-table-cell/>
        </table:table-row>
        <table:table-row table:style-name="Table1.1">
          <table:table-cell table:style-name="Table1.A24" office:value-type="string">
            <text:p text:style-name="P35">Numbers 33:29</text:p>
          </table:table-cell>
          <table:table-cell table:style-name="Table1.B34" office:value-type="string">
            <text:p text:style-name="P5"/>
          </table:table-cell>
          <table:table-cell table:style-name="Table1.C34" table:number-columns-spanned="2" office:value-type="string">
            <text:p text:style-name="P39"><text:span text:style-name="T4">Mithcah</text:span> → <text:span text:style-name="T4">Hashmonah</text:span></text:p>
          </table:table-cell>
          <table:covered-table-cell/>
        </table:table-row>
        <table:table-row table:style-name="Table1.1">
          <table:table-cell table:style-name="Table1.A24" office:value-type="string">
            <text:p text:style-name="P40">Numbers 33:30</text:p>
          </table:table-cell>
          <table:table-cell table:style-name="Table1.B35" office:value-type="string">
            <text:p text:style-name="P5"/>
          </table:table-cell>
          <table:table-cell table:style-name="Table1.C35" table:number-columns-spanned="2" office:value-type="string">
            <text:p text:style-name="P39"><text:span text:style-name="T4">Hashmonah</text:span> → <text:span text:style-name="T4">Moseroth</text:span> <text:span text:style-name="T44">(plural form)</text:span></text:p>
            <text:p text:style-name="P41"/>
            <text:p text:style-name="P41"><text:span text:style-name="T45">F</text:span>irst pass, heading south.</text:p>
          </table:table-cell>
          <table:covered-table-cell/>
        </table:table-row>
        <table:table-row table:style-name="Table1.1">
          <table:table-cell table:style-name="Table1.A24" office:value-type="string">
            <text:p text:style-name="P42">Numbers 33:31</text:p>
          </table:table-cell>
          <table:table-cell table:style-name="Table1.B36" office:value-type="string">
            <text:p text:style-name="P5"/>
          </table:table-cell>
          <table:table-cell table:style-name="Table1.C36" table:number-columns-spanned="2" office:value-type="string">
            <text:p text:style-name="P43"><text:span text:style-name="T4">Moseroth</text:span> → <text:span text:style-name="T4">Bene-jaakan</text:span></text:p>
            <text:p text:style-name="P44"/>
            <text:p text:style-name="P44">Bene- <text:span text:style-name="T46">(</text:span><text:span text:style-name="T47">plural form </text:span><text:span text:style-name="T48">of </text:span><text:span text:style-name="T49">ben</text:span><text:span text:style-name="T50">)</text:span><text:span text:style-name="T47"> </text:span>= “sons of” or “children of”.</text:p>
            <text:p text:style-name="P45">(cf. Deu 10:6 “<text:span text:style-name="T51">of the children of Jaakan</text:span>”)</text:p>
            <text:p text:style-name="P46"/>
            <text:p text:style-name="P46">Note that before Aaron’s death the company traveled in one direction <text:span text:style-name="T52">(south) </text:span>and after his death they traveled <text:span text:style-name="T53">back</text:span> <text:span text:style-name="T52">(north) </text:span>to circumvent the territory of Edom. <text:span text:style-name="T54">Hence the similar names. </text:span><text:span text:style-name="T55">T</text:span><text:span text:style-name="T54">he difference </text:span><text:span text:style-name="T55">between the names </text:span><text:span text:style-name="T54">being that some are specific points and some are general territorial references (but they refer to the same place</text:span><text:span text:style-name="T53">s</text:span><text:span text:style-name="T54">).</text:span></text:p>
          </table:table-cell>
          <table:covered-table-cell/>
        </table:table-row>
        <table:table-row table:style-name="Table1.1">
          <table:table-cell table:style-name="Table1.A37" office:value-type="string">
            <text:p text:style-name="P42">Numbers 33:32</text:p>
          </table:table-cell>
          <table:table-cell table:style-name="Table1.B37" office:value-type="string">
            <text:p text:style-name="P5"/>
          </table:table-cell>
          <table:table-cell table:style-name="Table1.C37" table:number-columns-spanned="2" office:value-type="string">
            <text:p text:style-name="P43"><text:span text:style-name="T4">Bene-jaakan</text:span> → <text:span text:style-name="T4">Hor-hagidgad</text:span></text:p>
            <text:p text:style-name="P47"/>
            <text:p text:style-name="P48">Hor-hagidgad relative to <text:span text:style-name="T56">its parallel </text:span>Gudgodah <text:span text:style-name="T57">(</text:span><text:span text:style-name="T56">Deu 10:7</text:span><text:span text:style-name="T57">) </text:span>is more specific, naming the explicit feature where the tents were pitched. <text:span text:style-name="T58">In other words, Hor-hagidgad is in Gudgodah.</text:span></text:p>
          </table:table-cell>
          <table:covered-table-cell/>
        </table:table-row>
        <text:soft-page-break/>
        <table:table-row table:style-name="Table1.1">
          <table:table-cell table:style-name="Table1.A37" office:value-type="string">
            <text:p text:style-name="P49">Numbers 33:33</text:p>
          </table:table-cell>
          <table:table-cell table:style-name="Table1.B38" office:value-type="string">
            <text:p text:style-name="P5"/>
          </table:table-cell>
          <table:table-cell table:style-name="Table1.C38" table:number-columns-spanned="2" office:value-type="string">
            <text:p text:style-name="Table_20_Contents"><text:span text:style-name="T59">Hor-hagidgad</text:span><text:span text:style-name="T60"> → </text:span><text:span text:style-name="T59">Jotbathah</text:span></text:p>
            <text:p text:style-name="P50"/>
            <text:p text:style-name="P51"><text:span text:style-name="T61">J</text:span><text:span text:style-name="T62">otbathah is the exact same place as Jotbath (Deu 10:7). The ending "-ah" is the Hebrew locative </text:span><text:span text:style-name="T63">He</text:span><text:span text:style-name="T62"> (ה), grammatically indicating movement "toward Jotbath" or being "stationed at Jotbath”.</text:span></text:p>
          </table:table-cell>
          <table:covered-table-cell/>
        </table:table-row>
        <table:table-row table:style-name="Table1.1">
          <table:table-cell table:style-name="Table1.A37" office:value-type="string">
            <text:p text:style-name="P52">Numbers 33:34</text:p>
          </table:table-cell>
          <table:table-cell table:style-name="Table1.B38" office:value-type="string">
            <text:p text:style-name="P5"/>
          </table:table-cell>
          <table:table-cell table:style-name="Table1.C38" table:number-columns-spanned="2" office:value-type="string">
            <text:p text:style-name="P53"><text:span text:style-name="T4">Jotbathah</text:span> → <text:span text:style-name="T4">Ebronah</text:span></text:p>
          </table:table-cell>
          <table:covered-table-cell/>
        </table:table-row>
        <table:table-row table:style-name="Table1.1">
          <table:table-cell table:style-name="Table1.A40" office:value-type="string">
            <text:p text:style-name="P54">Numbers 33:35</text:p>
            <text:p text:style-name="P54">Deuteronomy 2:8</text:p>
          </table:table-cell>
          <table:table-cell table:style-name="Table1.B40" office:value-type="string">
            <text:p text:style-name="P5"/>
          </table:table-cell>
          <table:table-cell table:style-name="Table1.C40" table:number-columns-spanned="2" office:value-type="string">
            <text:p text:style-name="P55"><text:span text:style-name="T4">Ebronah</text:span> → <text:span text:style-name="T4">Ezion-gaber</text:span></text:p>
            <text:p text:style-name="P55">(from <text:span text:style-name="T64">the plain of </text:span>Elath and from Ezion-gaber)</text:p>
            <text:p text:style-name="P55"/>
            <text:p text:style-name="P56">They did not exit by the way of the wilderness of Moab until after Aaron died and after Edom refused them passage.</text:p>
          </table:table-cell>
          <table:covered-table-cell/>
        </table:table-row>
        <table:table-row table:style-name="Table1.1">
          <table:table-cell table:style-name="Table1.A41" office:value-type="string">
            <text:p text:style-name="P57">Numbers 20:<text:span text:style-name="T65">1,</text:span>16, 33:36</text:p>
            <text:p text:style-name="P57">Genesis 14:7</text:p>
            <text:p text:style-name="P57">Deuteronomy 2:8</text:p>
            <text:p text:style-name="P58">Judges 11:16,17</text:p>
          </table:table-cell>
          <table:table-cell table:style-name="Table1.B41" office:value-type="string">
            <text:p text:style-name="P5"/>
          </table:table-cell>
          <table:table-cell table:style-name="Table1.C41" table:number-columns-spanned="2" office:value-type="string">
            <text:p text:style-name="P59"><text:span text:style-name="T4">Ezion-gaber</text:span> → <text:span text:style-name="T4">Kadesh</text:span><text:span text:style-name="T10"> </text:span><text:span text:style-name="T66">(wilderness of </text:span><text:span text:style-name="T67">Zin</text:span><text:span text:style-name="T66">)</text:span></text:p>
            <text:p text:style-name="P60"/>
            <text:p text:style-name="P59">Encampment in the <text:span text:style-name="T68">w</text:span>ilderness of <text:span text:style-name="T4">Zin</text:span>. Miriam dies; Moses strikes the rock twice for water; King of Edom denies passage on the uttermost border of his land.</text:p>
          </table:table-cell>
          <table:covered-table-cell/>
        </table:table-row>
        <table:table-row table:style-name="Table1.1">
          <table:table-cell table:style-name="Table1.A42" office:value-type="string">
            <text:p text:style-name="P61">Numbers <text:span text:style-name="T69">20:25-28, </text:span><text:span text:style-name="T70">21:3,4, </text:span>33:<text:span text:style-name="T71">37-</text:span>38</text:p>
            <text:p text:style-name="P62">Deuteronomy 10:6</text:p>
          </table:table-cell>
          <table:table-cell table:style-name="Table1.B42" office:value-type="string">
            <text:p text:style-name="P5">40th Year, 5th Month, 1st Day</text:p>
          </table:table-cell>
          <table:table-cell table:style-name="Table1.C42" office:value-type="string">
            <text:p text:style-name="P63"><text:span text:style-name="T72">Wilderness of </text:span><text:span text:style-name="T73">Zin</text:span><text:span text:style-name="T72"> (</text:span><text:span text:style-name="T73">Kadesh</text:span><text:span text:style-name="T72">)→ Mount </text:span><text:span text:style-name="T73">Hor</text:span><text:span text:style-name="T74"> / </text:span><text:span text:style-name="T75">Mosera</text:span><text:span text:style-name="T76"> </text:span><text:span text:style-name="T77">(Moseroth)</text:span></text:p>
            <text:p text:style-name="P64"/>
            <text:p text:style-name="P65">Camp leaves Kadesh oasis <text:span text:style-name="T78">and a</text:span>rrives at Mount Hor <text:span text:style-name="T79">in Mosera.</text:span></text:p>
            <text:p text:style-name="P65"/>
            <text:p text:style-name="P64">Aaron <text:span text:style-name="T80">goes up into the mountain and </text:span>dies <text:span text:style-name="T81">on Mount Hor.</text:span></text:p>
            <text:p text:style-name="P64"/>
            <text:p text:style-name="P66"><text:span text:style-name="T82">Some of Israel taken prisoner by king Arad </text:span><text:span text:style-name="T83">the Canaanite</text:span><text:span text:style-name="T82">. </text:span>Caananites <text:span text:style-name="T83">and their cities utterly destroyed </text:span>at Hormah before departing.</text:p>
          </table:table-cell>
          <table:table-cell table:style-name="Table1.D42" office:value-type="string">
            <text:p text:style-name="P63"><text:span text:style-name="T84">Kadesh</text:span><text:span text:style-name="T85"> → </text:span><text:span text:style-name="T86">Beeroth-</text:span><text:span text:style-name="T87">Jaakan</text:span><text:span text:style-name="T88"> </text:span><text:span text:style-name="T89">(in the wilderness of Zin)</text:span><text:span text:style-name="T88"> → </text:span><text:span text:style-name="T90">Mosera</text:span><text:span text:style-name="T91"> </text:span><text:span text:style-name="T92">(singular form) </text:span><text:span text:style-name="T93">(Moseroth)</text:span></text:p>
            <text:p text:style-name="P67"/>
            <text:p text:style-name="P68">Beeroth of the children of Jaakan = “Wells of the sons of Jaakan”.</text:p>
            <text:p text:style-name="P68"/>
            <text:p text:style-name="P69">Camp leaves Kadesh via the Jaakan well-system <text:span text:style-name="T78">and arrives </text:span><text:span text:style-name="T94">at</text:span><text:span text:style-name="T78"> Mosera.</text:span></text:p>
            <text:p text:style-name="P70"/>
            <text:p text:style-name="P71">Jaakan H3292 is a descendant of Seir the Horite (1Ch 1:42).</text:p>
          </table:table-cell>
        </table:table-row>
        <table:table-row table:style-name="Table1.1">
          <table:table-cell table:style-name="Table1.A43" office:value-type="string">
            <text:p text:style-name="P72">Numbers <text:span text:style-name="T95">20:4,10, </text:span>33:41-43</text:p>
            <text:p text:style-name="P73">Deuteronomy 10:7</text:p>
          </table:table-cell>
          <table:table-cell table:style-name="Table1.B43" office:value-type="string">
            <text:p text:style-name="P5"/>
          </table:table-cell>
          <table:table-cell table:style-name="Table1.C43" office:value-type="string">
            <text:p text:style-name="P74">Mount <text:span text:style-name="T4">Hor</text:span> → <text:span text:style-name="T4">Zalmonah</text:span> → <text:span text:style-name="T4">Punon</text:span> → <text:span text:style-name="T96">Oboth</text:span></text:p>
          </table:table-cell>
          <table:table-cell table:style-name="Table1.D43" office:value-type="string">
            <text:p text:style-name="P75"><text:span text:style-name="T4">Mosera</text:span> → <text:span text:style-name="T4">Gudgodah</text:span> (Hor-hagidgad) <text:span text:style-name="T97">→ </text:span><text:span text:style-name="T98">Jotbath</text:span><text:span text:style-name="T97"> (Jotbathah)</text:span></text:p>
            <text:p text:style-name="P76"/>
            <text:p text:style-name="P76">Gudgodah: <text:span text:style-name="T99">regional landscape containing Hor-hagidgad.</text:span></text:p>
            <text:p text:style-name="P76"/>
            <text:p text:style-name="P77">Jotbath: “a <text:span text:style-name="T4">land</text:span> of rivers of waters”.</text:p>
          </table:table-cell>
        </table:table-row>
        <text:soft-page-break/>
        <table:table-row table:style-name="Table1.1">
          <table:table-cell table:style-name="Table1.A44" office:value-type="string">
            <text:p text:style-name="P78">Numbers <text:span text:style-name="T100">20:11, </text:span><text:span text:style-name="T101">21:12-13, </text:span>33:44</text:p>
            <text:p text:style-name="P79">Deuteronomy 2:8,<text:span text:style-name="T102">14-</text:span><text:span text:style-name="T103">24</text:span></text:p>
            <text:p text:style-name="P80">Judges 11:18</text:p>
          </table:table-cell>
          <table:table-cell table:style-name="Table1.B44" office:value-type="string">
            <text:p text:style-name="P81">38 years elapsed since departing Kadesh-<text:span text:style-name="T104">b</text:span><text:span text:style-name="T100">a</text:span><text:span text:style-name="T104">rnea</text:span></text:p>
          </table:table-cell>
          <table:table-cell table:style-name="Table1.C44" office:value-type="string">
            <text:p text:style-name="Table_20_Contents"><text:span text:style-name="T96">Oboth</text:span><text:span text:style-name="T105"> → </text:span><text:span text:style-name="T96">Ijeabarim</text:span><text:span text:style-name="T105">/</text:span><text:span text:style-name="T96">Iim</text:span><text:span text:style-name="T105"> (border of Moab) → </text:span><text:span text:style-name="T101">valley of </text:span><text:span text:style-name="T106">Zared</text:span><text:span text:style-name="T101"> → </text:span><text:span text:style-name="T107">(orther side of) the river</text:span><text:span text:style-name="T108"> </text:span><text:span text:style-name="T109">Arno</text:span><text:span text:style-name="T110">n</text:span> <text:span text:style-name="T111">(border of Moab)</text:span></text:p>
          </table:table-cell>
          <table:table-cell table:style-name="Table1.D44" office:value-type="string">
            <text:p text:style-name="P82">The plain from Elath &amp; Ezion-gaber → Wilderness of <text:span text:style-name="T4">Moab</text:span></text:p>
            <text:p text:style-name="P83"/>
            <text:p text:style-name="P84">Crossing the brook Zered marks the end of the old generation of men of war.</text:p>
          </table:table-cell>
        </table:table-row>
        <table:table-row table:style-name="Table1.1">
          <table:table-cell table:style-name="Table1.A45" office:value-type="string">
            <text:p text:style-name="P85">Numbers 21:<text:span text:style-name="T112">16</text:span><text:span text:style-name="T113">-</text:span><text:span text:style-name="T114">35, </text:span><text:span text:style-name="T115">22:1, </text:span><text:span text:style-name="T116">33:4</text:span><text:span text:style-name="T117">5</text:span><text:span text:style-name="T116">-</text:span><text:span text:style-name="T118">49</text:span></text:p>
            <text:p text:style-name="P85">Deuteronomy 2:25 – 3:11</text:p>
            <text:p text:style-name="P86">Judges 11:20</text:p>
            <text:p text:style-name="P87">Psalm 135:10,11</text:p>
            <text:p text:style-name="P87">Psalm 136:<text:span text:style-name="T119">17-20</text:span></text:p>
          </table:table-cell>
          <table:table-cell table:style-name="Table1.B45" office:value-type="string">
            <text:p text:style-name="P81"/>
          </table:table-cell>
          <table:table-cell table:style-name="Table1.C45" office:value-type="string">
            <text:p text:style-name="P88"><text:span text:style-name="T96">Ijeabarim</text:span><text:span text:style-name="T105">/</text:span><text:span text:style-name="T96">Iim</text:span><text:span text:style-name="T105"> </text:span><text:span text:style-name="T120">(border of Moab) </text:span><text:span text:style-name="T105">→ </text:span><text:span text:style-name="T121">Beer</text:span><text:span text:style-name="T120"> (wilderness of Moab) →</text:span><text:span text:style-name="T105"> </text:span><text:span text:style-name="T96">Dibongad</text:span><text:span text:style-name="T105"> → </text:span><text:span text:style-name="T96">Almandiblathaim</text:span><text:span text:style-name="T105"> → </text:span><text:span text:style-name="T122">Mattanah</text:span><text:span text:style-name="T123"> → </text:span><text:span text:style-name="T122">Nahaliel</text:span><text:span text:style-name="T123"> → </text:span><text:span text:style-name="T122">Bamoth</text:span><text:span text:style-name="T123"> → </text:span><text:span text:style-name="T105">mountains of </text:span><text:span text:style-name="T96">Abarim</text:span><text:span text:style-name="T105"> (before Nebo; </text:span><text:span text:style-name="T124">Pisgah</text:span><text:span text:style-name="T105">) → plains of </text:span><text:span text:style-name="T96">Moab</text:span><text:span text:style-name="T125"> </text:span><text:span text:style-name="T126">by Jericho </text:span><text:span text:style-name="T127">(from Bethjesimoth to Abelshittim)</text:span></text:p>
          </table:table-cell>
          <table:table-cell table:style-name="Table1.D45" office:value-type="string">
            <text:p text:style-name="P89"><text:span text:style-name="T4">Bamoth</text:span> (in the valley in Moab) → <text:span text:style-name="T4">Pisgah</text:span> <text:span text:style-name="T128">(</text:span><text:span text:style-name="T120">both Pisgah and Nebo are places in Abarim</text:span><text:span text:style-name="T128">)</text:span><text:span text:style-name="T129"> → </text:span><text:span text:style-name="T130">Jaazer</text:span><text:span text:style-name="T131"> →</text:span> <text:span text:style-name="T132">the way of </text:span><text:span text:style-name="T133">Bashan</text:span><text:span text:style-name="T132"> → </text:span><text:span text:style-name="T133">Edrei</text:span><text:span text:style-name="T132"> → </text:span><text:span text:style-name="T134">plains of Moab by Jericho</text:span></text:p>
            <text:p text:style-name="P89"/>
            <text:p text:style-name="P90">Message sent to Sihon. Battle at Jahaz. <text:span text:style-name="T132">Battle at Edrei.</text:span></text:p>
          </table:table-cell>
        </table:table-row>
        <table:table-row table:style-name="Table1.1">
          <table:table-cell table:style-name="Table1.A46" office:value-type="string">
            <text:p text:style-name="P91">Deuteronomy 1:3</text:p>
            <text:p text:style-name="P91">Deuteronomy 34:8</text:p>
            <text:p text:style-name="P91">Joshua 2:5,16,22,23</text:p>
            <text:p text:style-name="P91">Joshua 3:1</text:p>
            <text:p text:style-name="P91">Joshua 1:11</text:p>
            <text:p text:style-name="P91">Joshua 4:<text:span text:style-name="T135">1</text:span>9</text:p>
          </table:table-cell>
          <table:table-cell table:style-name="Table1.B46" office:value-type="string">
            <text:p text:style-name="P92">38 days elapsed</text:p>
          </table:table-cell>
          <table:table-cell table:style-name="Table1.C46" table:number-columns-spanned="2" office:value-type="string">
            <text:p text:style-name="P93"><text:span text:style-name="T136">The last record</text:span><text:span text:style-name="T137">ed date</text:span><text:span text:style-name="T136"> of Moses being alive occurs </text:span><text:span text:style-name="T138">on the</text:span><text:span text:style-name="T136"> 40</text:span><text:span text:style-name="T139">th</text:span><text:span text:style-name="T136"> year, 11</text:span><text:span text:style-name="T139">th</text:span><text:span text:style-name="T136"> month, 1</text:span><text:span text:style-name="T139">st</text:span><text:span text:style-name="T136"> day. </text:span><text:span text:style-name="T137">Now, we add the time periods we are given </text:span><text:span text:style-name="T140">after</text:span><text:span text:style-name="T137"> Moses’ death: </text:span><text:span text:style-name="T136">30 days </text:span><text:span text:style-name="T141">mourning Moses’ death. </text:span><text:span text:style-name="T142">4 </text:span><text:span text:style-name="T143">days, </text:span><text:span text:style-name="T142">spies to Jericho</text:span><text:span text:style-name="T144">. </text:span><text:span text:style-name="T145">1 day, moving the entire camp from Shittim to the Jordan. </text:span><text:span text:style-name="T146">3 days waiting by the Jordan river. </text:span><text:span text:style-name="T147">Now if we add </text:span><text:span text:style-name="T148">this</text:span><text:span text:style-name="T147"> minimum of 3</text:span><text:span text:style-name="T145">8</text:span><text:span text:style-name="T147"> days we come to the 40th year, 12th month, </text:span><text:span text:style-name="T149">9</text:span><text:span text:style-name="T147">th day</text:span><text:span text:style-name="T150">. </text:span><text:span text:style-name="T151">Based on that, the</text:span><text:span text:style-name="T148"> earliest date when t</text:span><text:span text:style-name="T147">he children of Israel </text:span><text:span text:style-name="T148">could have </text:span><text:span text:style-name="T147">crossed the Jordan </text:span><text:span text:style-name="T150">is</text:span><text:span text:style-name="T152"> the 41</text:span><text:span text:style-name="T153">st</text:span><text:span text:style-name="T152"> year, 1</text:span><text:span text:style-name="T153">st</text:span><text:span text:style-name="T152"> month, </text:span><text:span text:style-name="T154">10</text:span><text:span text:style-name="T153">th</text:span><text:span text:style-name="T152"> day </text:span><text:span text:style-name="T155">(Joshua 4:19). </text:span><text:span text:style-name="T156">But it didn’t happen that year because that would be impossible: </text:span><text:span text:style-name="T157">f</text:span><text:span text:style-name="T158">rom the time they left Egypt on the 1</text:span><text:span text:style-name="T159">st</text:span><text:span text:style-name="T158"> year, 1</text:span><text:span text:style-name="T159">st</text:span><text:span text:style-name="T158"> month, 15</text:span><text:span text:style-name="T159">th</text:span><text:span text:style-name="T158"> day to the 41</text:span><text:span text:style-name="T159">st</text:span><text:span text:style-name="T158"> year, 1</text:span><text:span text:style-name="T159">st</text:span><text:span text:style-name="T158"> month, 10</text:span><text:span text:style-name="T159">th</text:span><text:span text:style-name="T158"> day comes to exactly 14,395 days </text:span><text:span text:style-name="T160">elapsed </text:span><text:span text:style-name="T158">(</text:span><text:span text:style-name="T161">39 years, 11 months, 25 days) </text:span><text:span text:style-name="T162">which is not even 40 years.</text:span></text:p>
            <text:p text:style-name="P94"/>
            <text:p text:style-name="P94"><text:span text:style-name="T161">We know from Numbers 14:20-34 </text:span><text:span text:style-name="T163">(and everything that </text:span><text:span text:style-name="T164">happened</text:span><text:span text:style-name="T163"> before it) </text:span><text:span text:style-name="T161">that the judgment to wander for 40 years was given </text:span><text:span text:style-name="T165">after</text:span><text:span text:style-name="T161"> they had already traveled for </text:span><text:span text:style-name="T165">over a year</text:span><text:span text:style-name="T161">.</text:span></text:p>
            <text:p text:style-name="P95"/>
            <text:p text:style-name="P96">This pushes the minimum date for the entering in of the promised land to <text:span text:style-name="T166">the next year (</text:span>42<text:span text:style-name="T32">nd</text:span> year, 1<text:span text:style-name="T32">st</text:span> month 10<text:span text:style-name="T32">th</text:span> day<text:span text:style-name="T166">)</text:span>. <text:span text:style-name="T167">But, it didn’t happen that year either because that </text:span><text:span text:style-name="T168">would be</text:span> <text:span text:style-name="T167">14,755 days </text:span><text:span text:style-name="T168">elapsed</text:span><text:span text:style-name="T167">. 40 years of wandering is exactly 14,400 days. 14,755 – 14,400 = 355 days. </text:span><text:span text:style-name="T169">355 days </text:span><text:span text:style-name="T170">is </text:span><text:span text:style-name="T171">not</text:span><text:span text:style-name="T170"> enough time </text:span><text:span text:style-name="T172">to cover the </text:span><text:span text:style-name="T173">over one year</text:span><text:span text:style-name="T172"> of traveling that occurred before the 40 year wandering judgment was given </text:span><text:span text:style-name="T174">in addition to the 40 years of wandering</text:span><text:span text:style-name="T172">. </text:span><text:span text:style-name="T175">Thus, the minimum date for the crossing of the Jordan </text:span><text:span text:style-name="T176">is</text:span><text:span text:style-name="T175"> the </text:span><text:span text:style-name="T177">43</text:span><text:span text:style-name="T178">rd</text:span><text:span text:style-name="T177"> year, 1</text:span><text:span text:style-name="T178">st</text:span><text:span text:style-name="T177"> month 10</text:span><text:span text:style-name="T178">th</text:span><text:span text:style-name="T177"> day</text:span><text:span text:style-name="T175">.</text:span></text:p>
            <text:p text:style-name="P96"/>
            <text:p text:style-name="P97">From the last time that Moses spake, which was <text:span text:style-name="T4">after</text:span> the campaigns against Sihon &amp; Og (Deu 1:3), to the earliest possible day that they could have crossed the Jordan, exactly 789 days passed <text:span text:style-name="T179">(2 years, 2 months, 9 days).</text:span></text:p>
          </table:table-cell>
          <table:covered-table-cell/>
        </table:table-row>
        <text:soft-page-break/>
        <table:table-row table:style-name="Table1.1">
          <table:table-cell table:style-name="Table1.A47" office:value-type="string">
            <text:p text:style-name="P98">Numbers 33:3</text:p>
            <text:p text:style-name="P98">→</text:p>
            <text:p text:style-name="P98">Joshua 4:19</text:p>
          </table:table-cell>
          <table:table-cell table:style-name="Table1.A47" office:value-type="string">
            <text:p text:style-name="P5">15,115 days</text:p>
            <text:p text:style-name="P5"/>
            <text:p text:style-name="P5">(41 years, 11 months, 25 days <text:span text:style-name="T180">elapsed</text:span>)</text:p>
          </table:table-cell>
          <table:table-cell table:style-name="Table1.C47" table:number-columns-spanned="2" office:value-type="string">
            <text:p text:style-name="Table_20_Contents">Total <text:span text:style-name="T181">minimum </text:span><text:span text:style-name="T182">t</text:span>ime <text:span text:style-name="T182">e</text:span>lapsed from the departure <text:span text:style-name="T183">of</text:span> Rameses <text:span text:style-name="T184">(1</text:span><text:span text:style-name="T185">st</text:span><text:span text:style-name="T184"> year, 1</text:span><text:span text:style-name="T185">st</text:span><text:span text:style-name="T184"> month, 15</text:span><text:span text:style-name="T185">th</text:span><text:span text:style-name="T184"> day)</text:span> to the crossing of the Jordan into Canaan <text:span text:style-name="T184">(</text:span><text:span text:style-name="T186">43</text:span><text:span text:style-name="T187">rd</text:span><text:span text:style-name="T184"> year, 1</text:span><text:span text:style-name="T185">st</text:span><text:span text:style-name="T184"> month, 10</text:span><text:span text:style-name="T185">th</text:span><text:span text:style-name="T184"> day).</text:span></text:p>
          </table:table-cell>
          <table:covered-table-cell/>
        </table:table-row>
      </table:table>
      <text:p text:style-name="P9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abriela" svg:font-family="Gabriela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line-height="100%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5T17:25:25.588371716</meta:creation-date>
    <dc:title>The Exodus Itinerary</dc:title>
    <meta:editing-duration>PT15H36M16S</meta:editing-duration>
    <meta:editing-cycles>398</meta:editing-cycles>
    <meta:generator>LibreOffice/26.2.4.2$Linux_X86_64 LibreOffice_project/64a984c51f4702dbd3710b13428c673a2f1292e7</meta:generator>
    <dc:date>2026-07-11T12:30:07.186177295</dc:date>
    <meta:print-date>2026-05-30T13:31:14.895400620</meta:print-date>
    <meta:printed-by>PDF files</meta:printed-by>
    <meta:document-statistic meta:table-count="1" meta:image-count="0" meta:object-count="0" meta:page-count="6" meta:paragraph-count="197" meta:word-count="1571" meta:character-count="9175" meta:non-whitespace-character-count="7798"/>
    <meta:template xlink:type="simple" xlink:actuate="onRequest" xlink:title="default" xlink:href="../../../../Templates/default.ott" meta:date="2026-05-25T17:25:24.447152548"/>
  </office:meta>
</office:document-meta>
</file>