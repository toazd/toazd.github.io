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2.6333in" style:rel-column-width="21845*"/>
    </style:style>
    <style:style style:name="Table6.A1" style:family="table-cell">
      <style:table-cell-properties fo:background-color="#729fc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background-color="#ff6d6d" fo:padding="0.0382in" fo:border="0.5pt solid #000000">
        <style:background-image/>
      </style:table-cell-properties>
    </style:style>
    <style:style style:name="Table6.A2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background-color="#ff6d6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B5" style:family="table-cell">
      <style:table-cell-properties fo:padding="0.0382in" fo:border-left="0.5pt solid #000000" fo:border-right="none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6.3542in" style:rel-column-width="52711*"/>
    </style:style>
    <style:style style:name="Table8.B" style:family="table-column">
      <style:table-column-properties style:column-width="1.5458in" style:rel-column-width="12824*"/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style:vertical-align="middle"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20b511" officeooo:paragraph-rsid="0020b511" style:font-size-asian="14pt" style:font-size-complex="14pt"/>
    </style:style>
    <style:style style:name="P2" style:family="paragraph" style:parent-style-name="Standard">
      <style:text-properties officeooo:paragraph-rsid="001e6c73"/>
    </style:style>
    <style:style style:name="P3" style:family="paragraph" style:parent-style-name="Table_20_Contents">
      <style:text-properties officeooo:paragraph-rsid="001b93fc"/>
    </style:style>
    <style:style style:name="P4" style:family="paragraph" style:parent-style-name="Standard">
      <style:text-properties officeooo:paragraph-rsid="003e9052"/>
    </style:style>
    <style:style style:name="P5" style:family="paragraph" style:parent-style-name="Standard">
      <style:text-properties fo:font-style="normal" officeooo:rsid="00273c6b" officeooo:paragraph-rsid="003e9052" style:font-style-asian="normal" style:font-style-complex="normal"/>
    </style:style>
    <style:style style:name="P6" style:family="paragraph" style:parent-style-name="Standard">
      <style:text-properties fo:font-style="normal" officeooo:rsid="00273c6b" style:font-style-asian="normal" style:font-style-complex="normal"/>
    </style:style>
    <style:style style:name="P7" style:family="paragraph" style:parent-style-name="Standard">
      <style:text-properties officeooo:rsid="0028a349" officeooo:paragraph-rsid="00442143"/>
    </style:style>
    <style:style style:name="P8" style:family="paragraph" style:parent-style-name="Standard">
      <style:text-properties fo:color="#127622" loext:opacity="100%" officeooo:rsid="00386b27" officeooo:paragraph-rsid="00442143"/>
    </style:style>
    <style:style style:name="P9" style:family="paragraph" style:parent-style-name="Standard">
      <style:text-properties officeooo:rsid="0028a349" officeooo:paragraph-rsid="0028a349"/>
    </style:style>
    <style:style style:name="P10" style:family="paragraph" style:parent-style-name="Standard">
      <style:text-properties officeooo:rsid="003ba649" officeooo:paragraph-rsid="004cdf28"/>
    </style:style>
    <style:style style:name="P11" style:family="paragraph" style:parent-style-name="Standard">
      <style:text-properties fo:font-style="normal" officeooo:rsid="00448234" officeooo:paragraph-rsid="003ba649" style:font-style-asian="normal" style:font-style-complex="normal"/>
    </style:style>
    <style:style style:name="P12" style:family="paragraph" style:parent-style-name="Standard">
      <style:text-properties fo:font-style="normal" officeooo:rsid="00448234" officeooo:paragraph-rsid="0044823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46ba2e" officeooo:paragraph-rsid="0046ba2e"/>
    </style:style>
    <style:style style:name="P14" style:family="paragraph" style:parent-style-name="Table_20_Contents">
      <style:paragraph-properties fo:text-align="center" style:justify-single-word="false"/>
      <style:text-properties fo:color="#127622" loext:opacity="100%" officeooo:rsid="0046ba2e" officeooo:paragraph-rsid="0046ba2e"/>
    </style:style>
    <style:style style:name="P15" style:family="paragraph" style:parent-style-name="Table_20_Contents">
      <style:paragraph-properties fo:text-align="center" style:justify-single-word="false"/>
      <style:text-properties officeooo:rsid="00474f64" officeooo:paragraph-rsid="00474f64"/>
    </style:style>
    <style:style style:name="P16" style:family="paragraph" style:parent-style-name="Table_20_Contents">
      <style:paragraph-properties fo:text-align="center" style:justify-single-word="false"/>
      <style:text-properties fo:color="#127622" loext:opacity="100%" officeooo:rsid="00474f64" officeooo:paragraph-rsid="00474f64"/>
    </style:style>
    <style:style style:name="P17" style:family="paragraph" style:parent-style-name="Standard">
      <style:text-properties fo:font-style="normal" officeooo:rsid="006e8996" officeooo:paragraph-rsid="006e8996" style:font-style-asian="normal" style:font-style-complex="normal"/>
    </style:style>
    <style:style style:name="P18" style:family="paragraph" style:parent-style-name="Standard">
      <style:text-properties fo:font-style="normal" officeooo:rsid="00638ed1" officeooo:paragraph-rsid="00986f87" style:font-style-asian="normal" style:font-style-complex="normal"/>
    </style:style>
    <style:style style:name="P19" style:family="paragraph" style:parent-style-name="Standard">
      <style:text-properties fo:font-style="normal" officeooo:rsid="00448234" officeooo:paragraph-rsid="00986f87" style:font-style-asian="normal" style:font-style-complex="normal"/>
    </style:style>
    <style:style style:name="P20" style:family="paragraph" style:parent-style-name="Table_20_Contents">
      <style:text-properties officeooo:paragraph-rsid="00986f87"/>
    </style:style>
    <style:style style:name="P21" style:family="paragraph" style:parent-style-name="Standard">
      <style:text-properties fo:font-style="normal" officeooo:rsid="00549e31" officeooo:paragraph-rsid="00986f87" style:font-style-asian="normal" style:font-style-complex="normal"/>
    </style:style>
    <style:style style:name="P22" style:family="paragraph" style:parent-style-name="Standard">
      <style:text-properties fo:font-style="normal" officeooo:rsid="00549e31" officeooo:paragraph-rsid="009ed39e" style:font-style-asian="normal" style:font-style-complex="normal"/>
    </style:style>
    <style:style style:name="P23" style:family="paragraph" style:parent-style-name="Standard">
      <style:text-properties fo:font-style="normal" officeooo:rsid="009e66dd" officeooo:paragraph-rsid="009ed39e" style:font-style-asian="normal" style:font-style-complex="normal"/>
    </style:style>
    <style:style style:name="P24" style:family="paragraph" style:parent-style-name="Standard">
      <style:text-properties fo:font-style="normal" officeooo:rsid="007e580d" officeooo:paragraph-rsid="007e580d" style:font-style-asian="normal" style:font-style-complex="normal"/>
    </style:style>
    <style:style style:name="P25" style:family="paragraph" style:parent-style-name="Table_20_Contents">
      <style:text-properties officeooo:rsid="005f085d" officeooo:paragraph-rsid="005f085d"/>
    </style:style>
    <style:style style:name="P26" style:family="paragraph" style:parent-style-name="Table_20_Contents">
      <style:text-properties officeooo:rsid="0061cf44" officeooo:paragraph-rsid="0061cf44"/>
    </style:style>
    <style:style style:name="P27" style:family="paragraph" style:parent-style-name="Table_20_Contents">
      <style:text-properties officeooo:rsid="00853b76" officeooo:paragraph-rsid="00853b76"/>
    </style:style>
    <style:style style:name="P28" style:family="paragraph" style:parent-style-name="Table_20_Contents">
      <style:text-properties officeooo:rsid="00892604" officeooo:paragraph-rsid="00892604"/>
    </style:style>
    <style:style style:name="P29" style:family="paragraph" style:parent-style-name="Table_20_Contents">
      <style:text-properties officeooo:rsid="00892604" officeooo:paragraph-rsid="008a1b9a"/>
    </style:style>
    <style:style style:name="P30" style:family="paragraph" style:parent-style-name="Table_20_Contents">
      <style:text-properties officeooo:rsid="008a1b9a" officeooo:paragraph-rsid="008a1b9a"/>
    </style:style>
    <style:style style:name="P31" style:family="paragraph" style:parent-style-name="Standard">
      <style:text-properties officeooo:rsid="0064e59f" officeooo:paragraph-rsid="00567c38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background-color="#ffffd7" loext:char-shading-value="0"/>
    </style:style>
    <style:style style:name="T4" style:family="text">
      <style:text-properties officeooo:rsid="00666cb9"/>
    </style:style>
    <style:style style:name="T5" style:family="text">
      <style:text-properties officeooo:rsid="00273c6b"/>
    </style:style>
    <style:style style:name="T6" style:family="text">
      <style:text-properties officeooo:rsid="00651c35"/>
    </style:style>
    <style:style style:name="T7" style:family="text">
      <style:text-properties officeooo:rsid="0030fed9"/>
    </style:style>
    <style:style style:name="T8" style:family="text">
      <style:text-properties officeooo:rsid="0032a4bd"/>
    </style:style>
    <style:style style:name="T9" style:family="text">
      <style:text-properties officeooo:rsid="00743fd3"/>
    </style:style>
    <style:style style:name="T10" style:family="text">
      <style:text-properties fo:font-style="normal" officeooo:rsid="00273c6b" style:font-style-asian="normal" style:font-style-complex="normal"/>
    </style:style>
    <style:style style:name="T11" style:family="text">
      <style:text-properties fo:font-style="normal" officeooo:rsid="007676ea" style:font-style-asian="normal" style:font-style-complex="normal"/>
    </style:style>
    <style:style style:name="T12" style:family="text">
      <style:text-properties officeooo:rsid="0039cded"/>
    </style:style>
    <style:style style:name="T13" style:family="text">
      <style:text-properties officeooo:rsid="00384871"/>
    </style:style>
    <style:style style:name="T14" style:family="text">
      <style:text-properties officeooo:rsid="0028a349"/>
    </style:style>
    <style:style style:name="T15" style:family="text">
      <style:text-properties officeooo:rsid="003cd583"/>
    </style:style>
    <style:style style:name="T16" style:family="text">
      <style:text-properties officeooo:rsid="003faf48"/>
    </style:style>
    <style:style style:name="T17" style:family="text">
      <style:text-properties fo:color="#127622" loext:opacity="100%" officeooo:rsid="0028a349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f5ce" loext:char-shading-value="0"/>
    </style:style>
    <style:style style:name="T20" style:family="text">
      <style:text-properties fo:background-color="#dee6ef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3609fb"/>
    </style:style>
    <style:style style:name="T24" style:family="text">
      <style:text-properties officeooo:rsid="00504e8c"/>
    </style:style>
    <style:style style:name="T25" style:family="text">
      <style:text-properties officeooo:rsid="00521a8f"/>
    </style:style>
    <style:style style:name="T26" style:family="text">
      <style:text-properties fo:color="#127622" loext:opacity="100%" officeooo:rsid="00521a8f"/>
    </style:style>
    <style:style style:name="T27" style:family="text">
      <style:text-properties fo:color="#127622" loext:opacity="100%" officeooo:rsid="00542d39"/>
    </style:style>
    <style:style style:name="T28" style:family="text">
      <style:text-properties fo:color="#127622" loext:opacity="100%" officeooo:rsid="00386b27"/>
    </style:style>
    <style:style style:name="T29" style:family="text">
      <style:text-properties officeooo:rsid="00386b27"/>
    </style:style>
    <style:style style:name="T30" style:family="text">
      <style:text-properties officeooo:rsid="00388784"/>
    </style:style>
    <style:style style:name="T31" style:family="text">
      <style:text-properties officeooo:rsid="00a1ee1b"/>
    </style:style>
    <style:style style:name="T32" style:family="text">
      <style:text-properties officeooo:rsid="004805b7"/>
    </style:style>
    <style:style style:name="T33" style:family="text">
      <style:text-properties officeooo:rsid="004cdf28"/>
    </style:style>
    <style:style style:name="T34" style:family="text">
      <style:text-properties officeooo:rsid="007949a5"/>
    </style:style>
    <style:style style:name="T35" style:family="text">
      <style:text-properties fo:color="#127622" loext:opacity="100%" officeooo:rsid="007949a5"/>
    </style:style>
    <style:style style:name="T36" style:family="text">
      <style:text-properties officeooo:rsid="004e64a3"/>
    </style:style>
    <style:style style:name="T37" style:family="text">
      <style:text-properties officeooo:rsid="006c15a5"/>
    </style:style>
    <style:style style:name="T38" style:family="text">
      <style:text-properties officeooo:rsid="006a78cf"/>
    </style:style>
    <style:style style:name="T39" style:family="text">
      <style:text-properties fo:font-style="normal" officeooo:rsid="00448234" style:font-style-asian="normal" style:font-style-complex="normal"/>
    </style:style>
    <style:style style:name="T40" style:family="text">
      <style:text-properties fo:font-style="normal" officeooo:rsid="0068a637" style:font-style-asian="normal" style:font-style-complex="normal"/>
    </style:style>
    <style:style style:name="T41" style:family="text">
      <style:text-properties fo:font-style="italic" officeooo:rsid="0068a637" style:font-style-asian="italic" style:font-style-complex="italic"/>
    </style:style>
    <style:style style:name="T42" style:family="text">
      <style:text-properties fo:font-style="normal" officeooo:rsid="00691615" style:font-style-asian="normal" style:font-style-complex="normal"/>
    </style:style>
    <style:style style:name="T43" style:family="text">
      <style:text-properties officeooo:rsid="007a8d53"/>
    </style:style>
    <style:style style:name="T44" style:family="text">
      <style:text-properties officeooo:rsid="00474f64"/>
    </style:style>
    <style:style style:name="T45" style:family="text">
      <style:text-properties officeooo:rsid="007ac8a1"/>
    </style:style>
    <style:style style:name="T46" style:family="text">
      <style:text-properties officeooo:rsid="00471dbb"/>
    </style:style>
    <style:style style:name="T47" style:family="text">
      <style:text-properties officeooo:rsid="007224b7"/>
    </style:style>
    <style:style style:name="T48" style:family="text">
      <style:text-properties officeooo:rsid="0064e59f"/>
    </style:style>
    <style:style style:name="T49" style:family="text">
      <style:text-properties fo:color="#729fcf" loext:opacity="100%" fo:background-color="transparent" loext:char-shading-value="0"/>
    </style:style>
    <style:style style:name="T50" style:family="text">
      <style:text-properties fo:color="#ff6d6d" loext:opacity="100%" fo:background-color="transparent" loext:char-shading-value="0"/>
    </style:style>
    <style:style style:name="T51" style:family="text">
      <style:text-properties fo:color="#ff6d6d" loext:opacity="100%"/>
    </style:style>
    <style:style style:name="T52" style:family="text">
      <style:text-properties fo:color="#729fcf" loext:opacity="100%"/>
    </style:style>
    <style:style style:name="T53" style:family="text">
      <style:text-properties fo:color="#55308d" loext:opacity="100%"/>
    </style:style>
    <style:style style:name="T54" style:family="text">
      <style:text-properties officeooo:rsid="009a0011"/>
    </style:style>
    <style:style style:name="T55" style:family="text">
      <style:text-properties officeooo:rsid="009ccf2f"/>
    </style:style>
    <style:style style:name="T56" style:family="text">
      <style:text-properties officeooo:rsid="0054c294"/>
    </style:style>
    <style:style style:name="T57" style:family="text">
      <style:text-properties officeooo:rsid="008020fe"/>
    </style:style>
    <style:style style:name="T58" style:family="text">
      <style:text-properties officeooo:rsid="005c5d8d"/>
    </style:style>
    <style:style style:name="T59" style:family="text">
      <style:text-properties officeooo:rsid="0081fe04"/>
    </style:style>
    <style:style style:name="T60" style:family="text">
      <style:text-properties officeooo:rsid="007e580d"/>
    </style:style>
    <style:style style:name="T61" style:family="text">
      <style:text-properties officeooo:rsid="009028bd"/>
    </style:style>
    <style:style style:name="T62" style:family="text">
      <style:text-properties officeooo:rsid="009197a0"/>
    </style:style>
    <style:style style:name="T63" style:family="text">
      <style:text-properties officeooo:rsid="008be467"/>
    </style:style>
    <style:style style:name="T64" style:family="text">
      <style:text-properties fo:background-color="#dee7e5" loext:char-shading-value="0"/>
    </style:style>
    <style:style style:name="T65" style:family="text">
      <style:text-properties officeooo:rsid="0096a036"/>
    </style:style>
    <style:style style:name="T66" style:family="text">
      <style:text-properties officeooo:rsid="008a1b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being unequally yoked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1">2 Corinthians 6:14-18</text:span><text:line-break/><text:span text:style-name="T2">14</text:span> <text:span text:style-name="T3">Be ye not unequally yoked together with unbelievers</text:span>: for what fellowship hath righteousness with unrighteousness? and what communion hath light with darkness?</text:p>
            <text:p text:style-name="P3"><text:span text:style-name="T2">15</text:span> And what concord hath Christ with Belial? or what part hath he that believeth with an infidel?</text:p>
            <text:p text:style-name="P3"><text:span text:style-name="T2">16</text:span> And what agreement hath the temple of God with idols? for ye are the temple of the living God; as God hath said, I will dwell in them, and walk in them; and I will be their God, and they shall be my people.</text:p>
            <text:p text:style-name="P3"><text:span text:style-name="T2">17</text:span> Wherefore come out from among them, and be ye separate, saith the Lord, and touch not the unclean thing; and I will receive you,</text:p>
            <text:p text:style-name="P3"><text:span text:style-name="T2">18</text:span> And will be a Father unto you, and ye shall be my sons and daughters, saith the Lord Almighty.</text:p>
          </table:table-cell>
        </table:table-row>
      </table:table>
      <text:p text:style-name="Standard"/>
      <text:p text:style-name="P4"><text:span text:style-name="T4">Imagine</text:span><text:span text:style-name="T5"> we have a married couple </text:span><text:span text:style-name="T6">and </text:span><text:span text:style-name="T5">one of them gets born again </text:span><text:span text:style-name="T6">after they were married</text:span><text:span text:style-name="T5">. Some may </text:span><text:span text:style-name="T7">think that</text:span><text:span text:style-name="T5"> this verse is commanding that the born again partner must divorce the unbelieving partner: but </text:span><text:span text:style-name="T8">if you think carefully </text:span><text:span text:style-name="T5">that would create a contradiction in the word of God. And because of that we can </text:span><text:span text:style-name="T9">easily </text:span><text:span text:style-name="T5">know that we aren’t rightly dividing the word of truth</text:span><text:span text:style-name="T10">.</text:span></text:p>
      <text:p text:style-name="P5"/>
      <text:p text:style-name="P5"/>
      <text:p text:style-name="P4"><text:span text:style-name="T11">L</text:span><text:span text:style-name="T12">et’s</text:span><text:span text:style-name="T13"> </text:span><text:span text:style-name="T14">take </text:span><text:span text:style-name="T15">that </text:span><text:span text:style-name="T16">same</text:span><text:span text:style-name="T15"> situation and </text:span><text:span text:style-name="T14">look </text:span><text:span text:style-name="T15">at</text:span><text:span text:style-name="T14"> </text:span><text:span text:style-name="T17">1Cor 7</text:span><text:span text:style-name="T14">:</text:span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1 Corinthians 7:10-16</text:span><text:line-break/>10 And unto the married I command, yet not I, but the Lord, <text:span text:style-name="T3">Let not the wife depart from her husband</text:span>:<text:line-break/>11 But and if she depart, let her remain unmarried, or be reconciled to her husband: and <text:span text:style-name="T3">let not the husband put away his wife</text:span>.<text:line-break/>12 But to the rest speak I, not the Lord: <text:span text:style-name="T3">If any </text:span><text:span text:style-name="T18">brother</text:span><text:span text:style-name="T3"> hath a wife that believeth not, and she be pleased to dwell with him, let him not put her away.</text:span><text:line-break/>13 <text:span text:style-name="T3">And the woman which hath an husband that believeth not, and if he be pleased to dwell with her, let her not leave him.</text:span><text:line-break/>14 <text:span text:style-name="T19">For the unbelieving husband is sanctified by the wife, and the unbelieving wife is sanctified by the husband</text:span>: else were your children unclean; but now are they holy.<text:line-break/>15 But if the unbelieving depart, let him depart. A brother or a sister is not under bondage in such cases: but <text:span text:style-name="T20">God hath called us to peace</text:span>.<text:line-break/>16 For what knowest thou, O wife, whether thou shalt save thy husband? or how knowest thou, O man, whether thou shalt save thy wife?</text:p>
          </table:table-cell>
        </table:table-row>
      </table:table>
      <text:p text:style-name="P6"/>
      <text:p text:style-name="P7">Here we are told that if one partner of the married couple is a believer and the other is not “<text:span text:style-name="T21">let him </text:span><text:span text:style-name="T22">not</text:span><text:span text:style-name="T21"> put her away</text:span>” and “<text:span text:style-name="T21">let her </text:span><text:span text:style-name="T22">not</text:span><text:span text:style-name="T21"> leave him</text:span>”. If <text:span text:style-name="T1">2Cor 6:14</text:span> were about married couples then the Bible <text:span text:style-name="T23">would be giving conflicting advice. </text:span><text:span text:style-name="T24">Since that’s not even possible, let’s back up for a moment </text:span><text:span text:style-name="T25">(</text:span><text:span text:style-name="T26">Pro</text:span><text:span text:style-name="T27">verbs</text:span><text:span text:style-name="T26"> 4:27b</text:span><text:span text:style-name="T25">)</text:span><text:span text:style-name="T24">.</text:span></text:p>
      <text:p text:style-name="P8"/>
      <text:p text:style-name="P7"><text:span text:style-name="T28">1Cor 7</text:span><text:span text:style-name="T29"> is obviously about married couples and </text:span><text:span text:style-name="T28">2Cor 6</text:span><text:span text:style-name="T29"> doesn’t mention marriage at all. So, if </text:span><text:span text:style-name="T28">2Cor 6:14</text:span><text:span text:style-name="T29"> is not about married couples that begs the question: what is it about?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0">For that, we’ll look at the entire context of the verse </text:span><text:span text:style-name="T12">and also look more closely at the verse itself.</text:span></text:p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2 Corinthians 6:1-18</text:span><text:line-break/>1 <text:span text:style-name="T18">We then, as workers together with him</text:span>, beseech you also that ye receive not the grace of God in vain.<text:line-break/>2 (For he saith, I have heard thee in a time accepted, and in the day of salvation have I succoured thee: behold, now is the accepted time; behold, now is the day of salvation.)<text:line-break/>3 Giving no offence in any thing, that the ministry be not blamed:<text:line-break/>4 But in all things approving ourselves as the ministers of God, in much patience, in afflictions, in necessities, in distresses,<text:line-break/>5 In stripes, in imprisonments, in tumults, in labours, in watchings, in fastings;<text:line-break/>6 By pureness, by knowledge, by longsuffering, by kindness, by the Holy Ghost, by love unfeigned,<text:line-break/>7 By the word of truth, by the power of God, by the armour of righteousness on the right hand and on the left,<text:line-break/>8 By honour and dishonour, by evil report and good report: as deceivers, and yet true;<text:line-break/>9 As unknown, and yet well known; as dying, and, behold, we live; as chastened, and not killed;<text:line-break/>10 As sorrowful, yet alway rejoicing; as poor, yet making many rich; as having nothing, and yet possessing all things.<text:line-break/>11 O ye Corinthians, our mouth is open unto you, our heart is enlarged.<text:line-break/>12 Ye are not straitened in us, but ye are straitened in your own bowels.<text:line-break/>13 Now for a recompence in the same, (I speak as unto my children,) be ye also enlarged.<text:line-break/>14 Be ye not unequally <text:span text:style-name="T19">yoked</text:span> together with unbelievers<text:span text:style-name="T18">:</text:span> for what <text:span text:style-name="T18">fellowship</text:span> hath righteousness with unrighteousness? and what <text:span text:style-name="T18">communion</text:span> hath light with darkness?<text:line-break/>15 And what <text:span text:style-name="T18">concord</text:span> hath Christ with Belial? or what <text:span text:style-name="T18">part</text:span> hath he that believeth with an infidel?<text:line-break/>16 And what <text:span text:style-name="T18">agreement</text:span> hath the temple of God with idols? for ye are the temple of the living God; as God hath said, I will dwell in them, and walk in them; and I will be their God, and they shall be my people.<text:line-break/>17 Wherefore come out from among them, and be ye separate, saith the Lord, and touch not the unclean thing; and I will receive you,<text:line-break/>18 And will be a Father unto you, and ye shall be my sons and daughters, saith the Lord Almighty.</text:p>
          </table:table-cell>
        </table:table-row>
      </table:table>
      <text:p text:style-name="P9"/>
      <text:p text:style-name="P10">The <text:span text:style-name="T31">first</text:span> verse of <text:span text:style-name="T1">2Cor 6</text:span> <text:span text:style-name="T32">gives us the context for the entire chapter: working together</text:span>. <text:span text:style-name="T33">It starts out talking about us working together with God and ends with warnings against working together with the </text:span><text:span text:style-name="T34">wicked (</text:span><text:span text:style-name="T35">Proverbs 3:33</text:span><text:span text:style-name="T34">)</text:span><text:span text:style-name="T33">. </text:span><text:span text:style-name="T36">Because it has nothing to do with marriage there is no contradiction with the rest of scripture.</text:span></text:p>
      <text:p text:style-name="P10"/>
      <text:p text:style-name="P10">Take the picture of a yoke and what <text:span text:style-name="T37">is it</text:span>? It’s typically <text:span text:style-name="T38">a </text:span>wooden device that links two (or more) oxen together to do what? <text:span text:style-name="T39">To work together! </text:span><text:span text:style-name="T40">In it’s context both the word and verse itself fit perfectly. It’s only when we take </text:span><text:span text:style-name="T41">any</text:span><text:span text:style-name="T40"> verse out of it’s context </text:span><text:span text:style-name="T42">that</text:span><text:span text:style-name="T40"> we venture towards error.</text:span></text:p>
      <text:p text:style-name="P11"/>
      <text:p text:style-name="P12">The phrase “<text:span text:style-name="T21">Be ye not unequally yoked together with unbelievers</text:span>” is followed by a colon, <text:span text:style-name="T43">which is </text:span><text:span text:style-name="T44">followed by 5</text:span> parallelisms to give us more understanding <text:span text:style-name="T45">about </text:span>exactly what is being said:</text:p>
      <text:p text:style-name="P1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3">Righteousness</text:p>
          </table:table-cell>
          <table:table-cell table:style-name="Table6.B1" office:value-type="string">
            <text:p text:style-name="P14"><text:span text:style-name="T46">F</text:span>ellowship</text:p>
          </table:table-cell>
          <table:table-cell table:style-name="Table6.C1" office:value-type="string">
            <text:p text:style-name="P13">Unrighteousness</text:p>
          </table:table-cell>
        </table:table-row>
        <table:table-row>
          <table:table-cell table:style-name="Table6.A2" office:value-type="string">
            <text:p text:style-name="P15">Light</text:p>
          </table:table-cell>
          <table:table-cell table:style-name="Table6.B2" office:value-type="string">
            <text:p text:style-name="P16">Communion</text:p>
          </table:table-cell>
          <table:table-cell table:style-name="Table6.C2" office:value-type="string">
            <text:p text:style-name="P15">Darkness</text:p>
          </table:table-cell>
        </table:table-row>
        <table:table-row>
          <table:table-cell table:style-name="Table6.A2" office:value-type="string">
            <text:p text:style-name="P15">Christ</text:p>
          </table:table-cell>
          <table:table-cell table:style-name="Table6.B2" office:value-type="string">
            <text:p text:style-name="P16">Concord</text:p>
          </table:table-cell>
          <table:table-cell table:style-name="Table6.C2" office:value-type="string">
            <text:p text:style-name="P15">Belial</text:p>
          </table:table-cell>
        </table:table-row>
        <table:table-row>
          <table:table-cell table:style-name="Table6.A2" office:value-type="string">
            <text:p text:style-name="P15">He that believeth</text:p>
          </table:table-cell>
          <table:table-cell table:style-name="Table6.B2" office:value-type="string">
            <text:p text:style-name="P16">Part</text:p>
          </table:table-cell>
          <table:table-cell table:style-name="Table6.C2" office:value-type="string">
            <text:p text:style-name="P15">Infidel</text:p>
          </table:table-cell>
        </table:table-row>
        <table:table-row>
          <table:table-cell table:style-name="Table6.A2" office:value-type="string">
            <text:p text:style-name="P15">Temple of the living God</text:p>
          </table:table-cell>
          <table:table-cell table:style-name="Table6.B5" office:value-type="string">
            <text:p text:style-name="P16">Agreement</text:p>
          </table:table-cell>
          <table:table-cell table:style-name="Table6.C2" office:value-type="string">
            <text:p text:style-name="P15">Idols</text:p>
          </table:table-cell>
        </table:table-row>
      </table:table>
      <text:p text:style-name="P12"/>
      <text:p text:style-name="P17">Imagine two oxen yoked together but pulling in opposite directions. It doesn’t really make a lot of sense does it?</text:p>
      <text:p text:style-name="P12"/>
      <text:p text:style-name="P18"><text:soft-page-break/>Now let’s take those parallelisms from <text:span text:style-name="T1">2Cor 6</text:span> and have a look at a real example <text:span text:style-name="T47">that we are given in the old testament </text:span><text:span text:style-name="T48">of “Be ye not unequally yoked with unbelievers” </text:span><text:span text:style-name="T47">and the consequences of doing so:</text:span></text:p>
      <text:p text:style-name="P19"/>
      <table:table table:name="Table7" table:style-name="Table7">
        <table:table-column table:style-name="Table7.A"/>
        <table:table-row>
          <table:table-cell table:style-name="Table7.A1" office:value-type="string">
            <text:p text:style-name="P20"><text:span text:style-name="T1">2 Chronicles 20:35-37</text:span><text:line-break/>35 And after this did <text:span text:style-name="T49">Jehoshaphat king of Judah</text:span> <text:span text:style-name="T1">join</text:span> himself with <text:span text:style-name="T50">Ahaziah king of Israel</text:span>, <text:span text:style-name="T51">who</text:span> did very wickedly:<text:line-break/>36 And <text:span text:style-name="T52">he</text:span> <text:span text:style-name="T1">joined</text:span> <text:span text:style-name="T52">himself</text:span> with <text:span text:style-name="T51">him</text:span> to make ships to go to Tarshish: and <text:span text:style-name="T53">they</text:span><text:span text:style-name="T1"> made</text:span> the ships in Ezion-geber.<text:line-break/>37 Then Eliezer the son of Dodavah of Mareshah prophesied against <text:span text:style-name="T52">Jehoshaphat</text:span>, saying, Because <text:span text:style-name="T52">thou</text:span> hast <text:span text:style-name="T1">joined</text:span> <text:span text:style-name="T52">thyself</text:span> with <text:span text:style-name="T51">Ahaziah</text:span>, <text:span text:style-name="T18">the LORD hath broken</text:span> <text:span text:style-name="T52">thy</text:span> <text:span text:style-name="T1">works</text:span>. And the ships were broken, that they were not able to go to Tarshish.</text:p>
          </table:table-cell>
        </table:table-row>
      </table:table>
      <text:p text:style-name="P21"/>
      <text:p text:style-name="P21"/>
      <text:p text:style-name="P22">Take notice also that each column <text:span text:style-name="T54">uses</text:span> different names for the same/<text:span text:style-name="T55">similar</text:span> things. These are called parallelisms: <text:span text:style-name="T56">where the “same thing” is called by different names or phrases.</text:span></text:p>
      <text:p text:style-name="P22"/>
      <text:p text:style-name="P23">They can teach us different aspects/qualities of a thing and they can also give us new definitions or words to describe the same thing or action.</text:p>
      <text:p text:style-name="P22"/>
      <text:p text:style-name="P22"><text:span text:style-name="T56">T</text:span>he<text:span text:style-name="T57">re are many of them in the</text:span> Bible, and they are very handy for <text:span text:style-name="T58">letting the word of God define itself: </text:span><text:span text:style-name="T59">which is crucial for rightly dividing the word of truth. </text:span><text:span text:style-name="T60">Parallelisms are </text:span><text:span text:style-name="T61">relatively</text:span><text:span text:style-name="T60"> easy to </text:span><text:span text:style-name="T62">see</text:span><text:span text:style-name="T60"> once you know to look for them. </text:span><text:span text:style-name="T63">Some of them are obvious and some of them require us to stop and think carefully.</text:span></text:p>
      <text:p text:style-name="P2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T1">Genesis 1:2</text:span><text:line-break/>And the earth was without form, and void; and darkness was upon <text:span text:style-name="T19">the face of </text:span><text:span text:style-name="T18">the</text:span><text:span text:style-name="T19"> </text:span><text:span text:style-name="T18">deep</text:span>. And the Spirit of God moved upon <text:span text:style-name="T19">the face of the </text:span><text:span text:style-name="T18">waters</text:span>.</text:p>
          </table:table-cell>
          <table:table-cell table:style-name="Table8.B1" office:value-type="string">
            <text:p text:style-name="P25">Two different words for the same thing.</text:p>
          </table:table-cell>
        </table:table-row>
        <table:table-row>
          <table:table-cell table:style-name="Table8.A2" office:value-type="string">
            <text:p text:style-name="Table_20_Contents"><text:span text:style-name="T1">Judges 18:17-20</text:span><text:line-break/>17 And the five men that went to spy out the land went up, and came in thither, and took the <text:span text:style-name="T18">graven</text:span><text:span text:style-name="T19"> image</text:span>, and <text:span text:style-name="T64">the ephod</text:span>, and <text:span text:style-name="T64">the teraphim</text:span>, and <text:span text:style-name="T64">the molten image</text:span>: and the priest stood in the entering of the gate with the six hundred men that were appointed with weapons of war.<text:line-break/>18 And these went into Micah's house, and fetched the <text:span text:style-name="T18">carved</text:span><text:span text:style-name="T19"> image</text:span>, <text:span text:style-name="T64">the ephod</text:span>, and <text:span text:style-name="T64">the teraphim</text:span>, and <text:span text:style-name="T64">the molten image</text:span>. Then said the priest unto them, What do ye?</text:p>
          </table:table-cell>
          <table:table-cell table:style-name="Table8.B2" office:value-type="string">
            <text:p text:style-name="P26">Two complete lists and one of the things is given two different adjectives.</text:p>
          </table:table-cell>
        </table:table-row>
        <table:table-row>
          <table:table-cell table:style-name="Table8.A2" office:value-type="string">
            <text:p text:style-name="Table_20_Contents"><text:span text:style-name="T1">Job 38:5</text:span><text:line-break/>Who hath <text:span text:style-name="T19">laid the measures</text:span> thereof, if thou knowest?<text:line-break/><text:span text:style-name="T18">or</text:span> who hath <text:span text:style-name="T19">stretched the line</text:span> upon it?</text:p>
          </table:table-cell>
          <table:table-cell table:style-name="Table8.B2" office:value-type="string">
            <text:p text:style-name="P27">Two phrases that <text:span text:style-name="T65">describe the same action</text:span>.</text:p>
          </table:table-cell>
        </table:table-row>
        <table:table-row>
          <table:table-cell table:style-name="Table8.A2" office:value-type="string">
            <text:p text:style-name="Table_20_Contents"><text:span text:style-name="T1">Job 38:17</text:span><text:line-break/>Have the <text:span text:style-name="T19">gates</text:span> of death been opened unto thee?<text:line-break/><text:span text:style-name="T18">or</text:span> hast thou seen the <text:span text:style-name="T19">doors</text:span> of the shadow of death?</text:p>
          </table:table-cell>
          <table:table-cell table:style-name="Table8.B2" office:value-type="string">
            <text:p text:style-name="P28">Two different words representing the same idea.</text:p>
          </table:table-cell>
        </table:table-row>
        <table:table-row>
          <table:table-cell table:style-name="Table8.A2" office:value-type="string">
            <text:p text:style-name="Table_20_Contents"><text:span text:style-name="T1">1 Samuel 20:24-27</text:span><text:line-break/>24 So David hid himself in the field: and when <text:span text:style-name="T19">the new moon</text:span> was come, the king sat him down to eat meat.<text:line-break/>25 And the king sat upon his seat, as at other times, even upon a seat by the wall: and Jonathan arose, and Abner sat by Saul's side, and David's place was empty.<text:line-break/>26 Nevertheless Saul spake not any thing that day: for he thought, Something hath befallen him, he is not clean; surely he is not clean.<text:line-break/>27 <text:span text:style-name="T18">And it came to pass on the morrow</text:span>, which was <text:span text:style-name="T19">the second day of the month</text:span>, that David's place was empty: and Saul said unto Jonathan his son, Wherefore cometh not the son of Jesse to meat, neither <text:span text:style-name="T18">yesterday</text:span>, nor <text:span text:style-name="T19">to day</text:span>?</text:p>
          </table:table-cell>
          <table:table-cell table:style-name="Table8.B2" office:value-type="string">
            <text:p text:style-name="P29">“<text:span text:style-name="T66">the new moon”</text:span></text:p>
            <text:p text:style-name="P30">is the same as</text:p>
            <text:p text:style-name="P30">“the first day of the month”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4:49:58.691354500</meta:creation-date>
    <dc:title>On being unequally yoked</dc:title>
    <meta:editing-duration>PT2H57M37S</meta:editing-duration>
    <meta:editing-cycles>136</meta:editing-cycles>
    <meta:generator>LibreOffice/26.2.4.2$Linux_X86_64 LibreOffice_project/64a984c51f4702dbd3710b13428c673a2f1292e7</meta:generator>
    <dc:date>2026-07-11T12:29:53.537674691</dc:date>
    <meta:document-statistic meta:table-count="6" meta:image-count="0" meta:object-count="0" meta:page-count="3" meta:paragraph-count="49" meta:word-count="1646" meta:character-count="8845" meta:non-whitespace-character-count="7248"/>
    <meta:template xlink:type="simple" xlink:actuate="onRequest" xlink:title="default" xlink:href="../../../../AppData/Roaming/LibreOffice/4/user/template/default.ott" meta:date="2026-01-23T14:49:58.324594200"/>
  </office:meta>
</office:document-meta>
</file>