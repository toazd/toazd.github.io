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8.2in" table:align="margins"/>
    </style:style>
    <style:style style:name="Table1.A" style:family="table-column">
      <style:table-column-properties style:column-width="8.2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8.2in" table:align="margins"/>
    </style:style>
    <style:style style:name="Table2.A" style:family="table-column">
      <style:table-column-properties style:column-width="8.2in" style:rel-column-width="65535*"/>
    </style:style>
    <style:style style:name="Table2.A1" style:family="table-cell">
      <style:table-cell-properties fo:padding="0.0382in" fo:border="0.5pt solid #000000"/>
    </style:style>
    <style:style style:name="T1" style:family="text">
      <style:text-properties style:text-position="33% 80%"/>
    </style:style>
    <style:style style:name="T2" style:family="text">
      <style:text-properties fo:color="#ff0000" loext:opacity="100%"/>
    </style:style>
    <style:style style:name="T3" style:family="text">
      <style:text-properties fo:font-style="italic"/>
    </style:style>
    <style:style style:name="T4" style:family="text">
      <style:text-properties fo:color="#ff0000" loext:opacity="100%" fo:background-color="#ffff00" loext:char-shading-value="0"/>
    </style:style>
    <style:style style:name="T5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John 2:1-11<text:line-break/><text:span text:style-name="T1">1</text:span> And the third day there was a marriage in Cana of Galilee; and the mother of Jesus was there: <text:line-break/><text:span text:style-name="T1">2</text:span> And both Jesus was called, and his disciples, to the marriage. <text:line-break/><text:span text:style-name="T1">3</text:span> And when they wanted wine, the mother of Jesus saith unto him, They have no wine. <text:line-break/><text:span text:style-name="T1">4</text:span> Jesus saith unto her, <text:span text:style-name="T2">Woman, what have I to do with thee? mine hour is not yet come.</text:span> <text:line-break/><text:span text:style-name="T1">5</text:span> His mother saith unto the servants, Whatsoever he saith unto you, do <text:span text:style-name="T3">it</text:span>. <text:line-break/><text:span text:style-name="T1">6</text:span> And there were set there six waterpots of stone, after the manner of the purifying of the Jews, containing two or three firkins apiece. <text:line-break/><text:span text:style-name="T1">7</text:span> Jesus saith unto them, <text:span text:style-name="T2">Fill the waterpots with water.</text:span> And they filled them up to the brim. <text:line-break/><text:span text:style-name="T1">8</text:span> And he saith unto them, <text:span text:style-name="T4">Draw out now, and bear unto the governor of the feast.</text:span> And they bare <text:span text:style-name="T3">it</text:span>. <text:line-break/><text:span text:style-name="T1">9</text:span> When the ruler of the feast had tasted <text:span text:style-name="T5">the water that was made wine</text:span>, and knew not whence it was: (but the servants which drew the water knew;) the governor of the feast called the bridegroom, <text:line-break/><text:span text:style-name="T1">10</text:span> And saith unto him, Every man at the beginning doth set forth good wine; and when men have well drunk, then that which is worse: <text:span text:style-name="T3">but</text:span> thou hast kept the good wine until now. <text:line-break/><text:span text:style-name="T1">11</text:span> This beginning of miracles <text:span text:style-name="T5">did Jesus</text:span> in Cana of Galilee, and manifested forth his glory; and his disciples believed on him.</text:p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James 1:13-14<text:line-break/><text:span text:style-name="T1">13</text:span> Let no man say when he is tempted, I am tempted of God: for God cannot be tempted with evil, <text:span text:style-name="T5">neither tempteth he any man:</text:span> <text:line-break/><text:span text:style-name="T1">14</text:span> But every man is tempted, when he is drawn away of his own lust, and enticed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15in" fo:margin-bottom="0.15in" fo:margin-left="0.15in" fo:margin-right="0.1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9T08:42:33.470000000</meta:creation-date>
    <meta:editing-duration>PT3M3S</meta:editing-duration>
    <meta:editing-cycles>5</meta:editing-cycles>
    <meta:generator>LibreOffice/26.2.4.2$Linux_X86_64 LibreOffice_project/64a984c51f4702dbd3710b13428c673a2f1292e7</meta:generator>
    <dc:title>BibleStudyTemplate</dc:title>
    <dc:date>2026-07-11T12:30:46.018220191</dc:date>
    <meta:document-statistic meta:table-count="2" meta:image-count="0" meta:object-count="0" meta:page-count="1" meta:paragraph-count="2" meta:word-count="287" meta:character-count="1475" meta:non-whitespace-character-count="1179"/>
    <meta:template xlink:type="simple" xlink:actuate="onRequest" xlink:title="BibleStudyTemplate" xlink:href="../../../../AppData/Roaming/LibreOffice/4/user/template/BibleStudyTemplate.ott" meta:date="2025-05-09T08:42:32.531000000"/>
  </office:meta>
</office:document-meta>
</file>