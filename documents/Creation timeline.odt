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1597in" table:align="margins" style:shadow="#808080 0.0403in -0.0403in"/>
    </style:style>
    <style:style style:name="Table1.A" style:family="table-column">
      <style:table-column-properties style:column-width="8.1597in" style:rel-column-width="65535*"/>
    </style:style>
    <style:style style:name="Table1.A1" style:family="table-cell">
      <style:table-cell-properties style:border-line-width="0.0021in 0.0021in 0.0021in" fo:padding="0.0382in" fo:border="0.45pt double #000000"/>
    </style:style>
    <style:style style:name="Table1.A2" style:family="table-cell">
      <style:table-cell-properties style:border-line-width-left="0.0021in 0.0021in 0.0021in" style:border-line-width-right="0.0021in 0.0021in 0.0021in" style:border-line-width-bottom="0.0021in 0.0021in 0.0021in" fo:padding="0.0382in" fo:border-left="0.45pt double #000000" fo:border-right="0.45pt double #000000" fo:border-top="none" fo:border-bottom="0.45pt double #000000"/>
    </style:style>
    <style:style style:name="P1" style:family="paragraph" style:parent-style-name="Table_20_Contents">
      <style:text-properties officeooo:paragraph-rsid="001bf0ee"/>
    </style:style>
    <style:style style:name="P2" style:family="paragraph" style:parent-style-name="Table_20_Contents">
      <style:text-properties fo:color="#127622" loext:opacity="100%" style:font-name="Gabriela Nerd Font" officeooo:paragraph-rsid="001bf0ee"/>
    </style:style>
    <style:style style:name="T1" style:family="text">
      <style:text-properties fo:color="#127622" loext:opacity="100%" style:font-name="Gabriela Nerd Font"/>
    </style:style>
    <style:style style:name="T2" style:family="text">
      <style:text-properties fo:font-size="12pt" style:font-size-asian="12pt" style:font-size-complex="12pt"/>
    </style:style>
    <style:style style:name="T3" style:family="text">
      <style:text-properties style:text-position="33% 80%" fo:font-size="12pt" style:font-size-asian="12pt" style:font-size-complex="12pt"/>
    </style:style>
    <style:style style:name="T4" style:family="text">
      <style:text-properties fo:font-size="12pt" fo:font-style="itali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text:span text:style-name="T1">Genesis 1:1-31</text:span><text:span text:style-name="T2"><text:line-break/></text:span><text:span text:style-name="T3">1</text:span><text:span text:style-name="T2"> In the beginning God created the heaven and the earth. <text:line-break/></text:span><text:span text:style-name="T3">2</text:span><text:span text:style-name="T2"> And the earth was without form, and void; and darkness </text:span><text:span text:style-name="T4">was</text:span><text:span text:style-name="T2"> upon the face of the deep. And the Spirit of God moved upon the face of the waters. <text:line-break/></text:span><text:span text:style-name="T3">3</text:span><text:span text:style-name="T2"> And God said, Let there be light: and there was light. <text:line-break/></text:span><text:span text:style-name="T3">4</text:span><text:span text:style-name="T2"> And God saw the light, that </text:span><text:span text:style-name="T4">it was</text:span><text:span text:style-name="T2"> good: and God divided the light from the darkness. <text:line-break/></text:span><text:span text:style-name="T3">5</text:span><text:span text:style-name="T2"> And God called the light Day, and the darkness he called Night. And the evening and the morning were the first day. <text:line-break/></text:span><text:span text:style-name="T3">6</text:span><text:span text:style-name="T2"> And God said, Let there be a firmament in the midst of the waters, and let it divide the waters from the waters. <text:line-break/></text:span><text:span text:style-name="T3">7</text:span><text:span text:style-name="T2"> And God made the firmament, and divided the waters which </text:span><text:span text:style-name="T4">were</text:span><text:span text:style-name="T2"> under the firmament from the waters which </text:span><text:span text:style-name="T4">were</text:span><text:span text:style-name="T2"> above the firmament: and it was so. <text:line-break/></text:span><text:span text:style-name="T3">8</text:span><text:span text:style-name="T2"> And God called the firmament Heaven. And the evening and the morning were the second day. <text:line-break/></text:span><text:span text:style-name="T3">9</text:span><text:span text:style-name="T2"> And God said, Let the waters under the heaven be gathered together unto one place, and let the dry </text:span><text:span text:style-name="T4">land</text:span><text:span text:style-name="T2"> appear: and it was so. <text:line-break/></text:span><text:span text:style-name="T3">10</text:span><text:span text:style-name="T2"> And God called the dry </text:span><text:span text:style-name="T4">land</text:span><text:span text:style-name="T2"> Earth; and the gathering together of the waters called he Seas: and God saw that </text:span><text:span text:style-name="T4">it was</text:span><text:span text:style-name="T2"> good. <text:line-break/></text:span><text:span text:style-name="T3">11</text:span><text:span text:style-name="T2"> And God said, Let the earth bring forth grass, the herb yielding seed, </text:span><text:span text:style-name="T4">and</text:span><text:span text:style-name="T2"> the fruit tree yielding fruit after his kind, whose seed </text:span><text:span text:style-name="T4">is</text:span><text:span text:style-name="T2"> in itself, upon the earth: and it was so. <text:line-break/></text:span><text:span text:style-name="T3">12</text:span><text:span text:style-name="T2"> And the earth brought forth grass, </text:span><text:span text:style-name="T4">and</text:span><text:span text:style-name="T2"> herb yielding seed after his kind, and the tree yielding fruit, whose seed </text:span><text:span text:style-name="T4">was</text:span><text:span text:style-name="T2"> in itself, after his kind: and God saw that </text:span><text:span text:style-name="T4">it was</text:span><text:span text:style-name="T2"> good. <text:line-break/></text:span><text:span text:style-name="T3">13</text:span><text:span text:style-name="T2"> And the evening and the morning were the third day. <text:line-break/></text:span><text:span text:style-name="T3">14</text:span><text:span text:style-name="T2"> And God said, Let there be lights in the firmament of the heaven to divide the day from the night; and let them be for signs, and for seasons, and for days, and years: <text:line-break/></text:span><text:span text:style-name="T3">15</text:span><text:span text:style-name="T2"> And let them be for lights in the firmament of the heaven to give light upon the earth: and it was so. <text:line-break/></text:span><text:span text:style-name="T3">16</text:span><text:span text:style-name="T2"> And God made two great lights; the greater light to rule the day, and the lesser light to rule the night: </text:span><text:span text:style-name="T4">he made</text:span><text:span text:style-name="T2"> the stars also. <text:line-break/></text:span><text:span text:style-name="T3">17</text:span><text:span text:style-name="T2"> And God set them in the firmament of the heaven to give light upon the earth, <text:line-break/></text:span><text:span text:style-name="T3">18</text:span><text:span text:style-name="T2"> And to rule over the day and over the night, and to divide the light from the darkness: and God saw that </text:span><text:span text:style-name="T4">it was</text:span><text:span text:style-name="T2"> good. <text:line-break/></text:span><text:span text:style-name="T3">19</text:span><text:span text:style-name="T2"> And the evening and the morning were the fourth day. <text:line-break/></text:span><text:span text:style-name="T3">20</text:span><text:span text:style-name="T2"> And God said, Let the waters bring forth abundantly the moving creature that hath life, and fowl </text:span><text:span text:style-name="T4">that</text:span><text:span text:style-name="T2"> may fly above the earth in the open firmament of heaven. <text:line-break/></text:span><text:span text:style-name="T3">21</text:span><text:span text:style-name="T2"> And God created great whales, and every living creature that moveth, which the waters brought forth abundantly, after their kind, and every winged fowl after his kind: and God saw that </text:span><text:span text:style-name="T4">it was</text:span><text:span text:style-name="T2"> good. <text:line-break/></text:span><text:span text:style-name="T3">22</text:span><text:span text:style-name="T2"> And God blessed them, saying, Be fruitful, and multiply, and fill the waters in the seas, and let fowl multiply in the earth. <text:line-break/></text:span><text:span text:style-name="T3">23</text:span><text:span text:style-name="T2"> And the evening and the morning were the fifth day. <text:line-break/></text:span><text:span text:style-name="T3">24</text:span><text:span text:style-name="T2"> And God said, Let the earth bring forth the living creature after his kind, cattle, and creeping thing, and beast of the earth after his kind: and it was so. <text:line-break/></text:span><text:span text:style-name="T3">25</text:span><text:span text:style-name="T2"> And God made the beast of the earth after his kind, and cattle after their kind, and every thing that creepeth upon the earth after his kind: and God saw that </text:span><text:span text:style-name="T4">it was</text:span><text:span text:style-name="T2"> good. <text:line-break/></text:span><text:span text:style-name="T3">26</text:span><text:span text:style-name="T2"> And God said, Let us make man in our image, after our likeness: and let them have dominion over the fish of the sea, and over the fowl of the air, and over the cattle, and over all the earth, and over every creeping thing that creepeth upon the earth. <text:line-break/></text:span><text:span text:style-name="T3">27</text:span><text:span text:style-name="T2"> So God created man in his </text:span><text:span text:style-name="T4">own</text:span><text:span text:style-name="T2"> image, in the image of God created he him; male and female created he them. <text:line-break/></text:span><text:span text:style-name="T3">28</text:span><text:span text:style-name="T2"> And God blessed them, and God said unto them, Be fruitful, and multiply, and replenish the earth, and subdue it: and have dominion over the fish of the sea, and over the fowl of the air, and over every living thing that moveth upon the earth. <text:line-break/></text:span><text:soft-page-break/><text:span text:style-name="T3">29</text:span><text:span text:style-name="T2"> And God said, Behold, I have given you every herb bearing seed, which </text:span><text:span text:style-name="T4">is</text:span><text:span text:style-name="T2"> upon the face of all the earth, and every tree, in the which </text:span><text:span text:style-name="T4">is</text:span><text:span text:style-name="T2"> the fruit of a tree yielding seed; to you it shall be for meat. <text:line-break/></text:span><text:span text:style-name="T3">30</text:span><text:span text:style-name="T2"> And to every beast of the earth, and to every fowl of the air, and to every thing that creepeth upon the earth, wherein </text:span><text:span text:style-name="T4">there is</text:span><text:span text:style-name="T2"> life, </text:span><text:span text:style-name="T4">I have given</text:span><text:span text:style-name="T2"> every green herb for meat: and it was so. <text:line-break/></text:span><text:span text:style-name="T3">31</text:span><text:span text:style-name="T2"> And God saw every thing that he had made, and, behold, </text:span><text:span text:style-name="T4">it was</text:span><text:span text:style-name="T2"> very good. And the evening and the morning were the sixth day.</text:span></text:p>
          </table:table-cell>
        </table:table-row>
        <table:table-row>
          <table:table-cell table:style-name="Table1.A2" office:value-type="string">
            <text:p text:style-name="P1"><text:span text:style-name="T1">Genesis 2:1-3</text:span><text:span text:style-name="T2"><text:line-break/></text:span><text:span text:style-name="T3">1</text:span><text:span text:style-name="T2"> Thus the heavens and the earth were finished, and all the host of them. <text:line-break/></text:span><text:span text:style-name="T3">2</text:span><text:span text:style-name="T2"> And on the seventh day God ended his work which he had made; and he rested on the seventh day from all his work which he had made. <text:line-break/></text:span><text:span text:style-name="T3">3</text:span><text:span text:style-name="T2"> And God blessed the seventh day, and sanctified it: because that in it he had rested from all his work which God created and made.</text:span></text:p>
          </table:table-cell>
        </table:table-row>
        <table:table-row>
          <table:table-cell table:style-name="Table1.A2" office:value-type="string">
            <text:p text:style-name="P2">Exodus 20:11</text:p>
            <text:p text:style-name="P1">For in six days the LORD made heaven and earth, the sea, and all that in them is, and rested the seventh day: wherefore the LORD blessed the sabbath day, and hallowed it.</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0T17:01:10.755000000</meta:creation-date>
    <meta:editing-duration>PT5M39S</meta:editing-duration>
    <meta:editing-cycles>6</meta:editing-cycles>
    <meta:generator>LibreOffice/26.2.4.2$Linux_X86_64 LibreOffice_project/64a984c51f4702dbd3710b13428c673a2f1292e7</meta:generator>
    <dc:title>BibleStudyTemplate</dc:title>
    <dc:date>2026-07-11T12:31:07.680285623</dc:date>
    <meta:document-statistic meta:table-count="1" meta:image-count="0" meta:object-count="0" meta:page-count="2" meta:paragraph-count="4" meta:word-count="937" meta:character-count="4753" meta:non-whitespace-character-count="3788"/>
    <meta:template xlink:type="simple" xlink:actuate="onRequest" xlink:title="BibleStudyTemplate" xlink:href="../../../../AppData/Roaming/LibreOffice/4/user/template/BibleStudyTemplate.ott" meta:date="2025-05-10T17:01:10.378000000"/>
  </office:meta>
</office:document-meta>
</file>