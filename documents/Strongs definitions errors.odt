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9c3f" officeooo:paragraph-rsid="00329c3f" style:font-size-asian="14pt" style:font-size-complex="14pt"/>
    </style:style>
    <style:style style:name="P2" style:family="paragraph" style:parent-style-name="Standard">
      <style:text-properties officeooo:rsid="00329c3f" officeooo:paragraph-rsid="00329c3f"/>
    </style:style>
    <style:style style:name="P3" style:family="paragraph" style:parent-style-name="Table_20_Contents">
      <style:text-properties fo:font-weight="bold" officeooo:paragraph-rsid="001a917c" style:font-weight-asian="bold" style:font-weight-complex="bold"/>
    </style:style>
    <style:style style:name="P4" style:family="paragraph" style:parent-style-name="Table_20_Contents">
      <style:text-properties officeooo:paragraph-rsid="001a917c"/>
    </style:style>
    <style:style style:name="P5" style:family="paragraph" style:parent-style-name="Standard" style:list-style-name="L1">
      <style:text-properties officeooo:rsid="001f8a2e" officeooo:paragraph-rsid="0020deee"/>
    </style:style>
    <style:style style:name="P6" style:family="paragraph" style:parent-style-name="Table_20_Contents">
      <style:text-properties fo:font-weight="bold" officeooo:paragraph-rsid="001d5e93" style:font-weight-asian="bold" style:font-weight-complex="bold"/>
    </style:style>
    <style:style style:name="P7" style:family="paragraph" style:parent-style-name="Table_20_Contents">
      <style:text-properties officeooo:paragraph-rsid="001d5e93"/>
    </style:style>
    <style:style style:name="P8" style:family="paragraph" style:parent-style-name="Standard" style:list-style-name="L2">
      <style:text-properties officeooo:rsid="001f2451" officeooo:paragraph-rsid="001f2451"/>
    </style:style>
    <style:style style:name="P9" style:family="paragraph" style:parent-style-name="Standard">
      <style:text-properties officeooo:rsid="001f2451" officeooo:paragraph-rsid="001f2451"/>
    </style:style>
    <style:style style:name="P10" style:family="paragraph" style:parent-style-name="Table_20_Contents">
      <style:text-properties officeooo:paragraph-rsid="0023f0e2"/>
    </style:style>
    <style:style style:name="P11" style:family="paragraph" style:parent-style-name="Standard" style:list-style-name="L3">
      <style:text-properties officeooo:rsid="0026e110" officeooo:paragraph-rsid="0026e110"/>
    </style:style>
    <style:style style:name="P12" style:family="paragraph" style:parent-style-name="Standard">
      <style:text-properties officeooo:rsid="0026e110" officeooo:paragraph-rsid="0026e110"/>
    </style:style>
    <style:style style:name="P13" style:family="paragraph" style:parent-style-name="Table_20_Contents">
      <style:text-properties fo:font-weight="bold" officeooo:paragraph-rsid="002a1054" style:font-weight-asian="bold" style:font-weight-complex="bold"/>
    </style:style>
    <style:style style:name="P14" style:family="paragraph" style:parent-style-name="Table_20_Contents">
      <style:text-properties officeooo:paragraph-rsid="002a1054"/>
    </style:style>
    <style:style style:name="P15" style:family="paragraph" style:parent-style-name="Table_20_Contents">
      <style:text-properties officeooo:paragraph-rsid="002d0557"/>
    </style:style>
    <style:style style:name="P16" style:family="paragraph" style:parent-style-name="Table_20_Contents">
      <style:text-properties officeooo:paragraph-rsid="002e8246"/>
    </style:style>
    <style:style style:name="P17" style:family="paragraph" style:parent-style-name="Standard" style:list-style-name="L4">
      <style:text-properties officeooo:rsid="002ec9cc" officeooo:paragraph-rsid="002ec9cc"/>
    </style:style>
    <style:style style:name="T1" style:family="text">
      <style:text-properties officeooo:rsid="001a917c"/>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color="#127622" loext:opacity="100%"/>
    </style:style>
    <style:style style:name="T5" style:family="text">
      <style:text-properties officeooo:rsid="0020deee"/>
    </style:style>
    <style:style style:name="T6" style:family="text">
      <style:text-properties officeooo:rsid="001d5e93"/>
    </style:style>
    <style:style style:name="T7" style:family="text">
      <style:text-properties fo:color="#127622" loext:opacity="100%" officeooo:rsid="0027dcf3"/>
    </style:style>
    <style:style style:name="T8" style:family="text">
      <style:text-properties fo:font-weight="bold" officeooo:rsid="0023f0e2" style:font-weight-asian="bold" style:font-weight-complex="bold"/>
    </style:style>
    <style:style style:name="T9" style:family="text">
      <style:text-properties officeooo:rsid="002a1054"/>
    </style:style>
    <style:style style:name="T10" style:family="text">
      <style:text-properties officeooo:rsid="0030ec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s in Strong’s definitions</text:p>
      <text:p text:style-name="Standard"/>
      <text:p text:style-name="P2">This is not an exhaustive list it’s just what I have found so far.</text:p>
      <text:p text:style-name="Standard"/>
      <table:table table:name="Table1" table:style-name="Table1">
        <table:table-column table:style-name="Table1.A"/>
        <table:table-row>
          <table:table-cell table:style-name="Table1.A1" office:value-type="string">
            <text:p text:style-name="P3"><text:span text:style-name="T1">G11</text:span></text:p>
            <text:p text:style-name="P4">Ἀβραάμ <text:s/>(Abraám | ab-rah-am')</text:p>
            <text:p text:style-name="P4"/>
            <text:p text:style-name="P4"><text:span text:style-name="T2">Derivation</text:span>: of Hebrew origin (H85 )</text:p>
            <text:p text:style-name="P4"><text:span text:style-name="T2">Strong's</text:span>: Abraham, the Hebrew patriarch</text:p>
            <text:p text:style-name="P4"><text:span text:style-name="T2">KJV</text:span>: —Abraham. (<text:span text:style-name="T3">In Acts 7:16 the text should probably read Jacob.</text:span>)</text:p>
            <text:p text:style-name="P4"/>
            <text:p text:style-name="P4"><text:span text:style-name="T2">See</text:span>: H85Cognate Group: G11 (Abraham)</text:p>
            <text:p text:style-name="P4"><text:span text:style-name="T2">Variants</text:span>: Ἀβραάμ</text:p>
            <text:p text:style-name="P4"><text:span text:style-name="T2">Hebrew Equivalents</text:span>: H85 אַבְרָהָם"</text:p>
          </table:table-cell>
        </table:table-row>
      </table:table>
      <text:list text:style-name="L1">
        <text:list-item>
          <text:p text:style-name="P5">This phrase is “casting doubt at the word of God” (the same as Satan in the garden with Eve in <text:span text:style-name="T4">Genesis 3:1</text:span>).</text:p>
        </text:list-item>
        <text:list-item>
          <text:p text:style-name="P5"><text:span text:style-name="T5">It also a</text:span>ccuses God of not keeping His promise in <text:span text:style-name="T4">Psalm 12:6,7</text:span>.</text:p>
        </text:list-item>
      </text:list>
      <text:p text:style-name="Standard"/>
      <text:p text:style-name="Standard"/>
      <table:table table:name="Table2" table:style-name="Table2">
        <table:table-column table:style-name="Table2.A"/>
        <table:table-row>
          <table:table-cell table:style-name="Table2.A1" office:value-type="string">
            <text:p text:style-name="P6"><text:span text:style-name="T6">H1966</text:span></text:p>
            <text:p text:style-name="P7">"הֵילֵל <text:s/>(hêylêl | hay-lale')</text:p>
            <text:p text:style-name="P7"/>
            <text:p text:style-name="P7"><text:span text:style-name="T2">Derivation</text:span>: from H1984 הָלַל (in the sense of brightness)</text:p>
            <text:p text:style-name="P7"><text:span text:style-name="T2">Strong's</text:span>: <text:span text:style-name="T3">the morning-star</text:span></text:p>
            <text:p text:style-name="P7"><text:span text:style-name="T2">KJV</text:span>: lucifer.</text:p>
            <text:p text:style-name="P7"/>
            <text:p text:style-name="P7"><text:span text:style-name="T2">Cognate Group</text:span>: H1966 (lucifer), H1984 (boast)</text:p>
          </table:table-cell>
        </table:table-row>
      </table:table>
      <text:list text:style-name="L2">
        <text:list-item>
          <text:p text:style-name="P8">Jesus is the morning star, not Satan (<text:span text:style-name="T4">Rev</text:span><text:span text:style-name="T7">elation</text:span><text:span text:style-name="T4"> 22:16</text:span>).</text:p>
        </text:list-item>
      </text:list>
      <text:p text:style-name="P9"/>
      <text:p text:style-name="P9"/>
      <table:table table:name="Table3" table:style-name="Table3">
        <table:table-column table:style-name="Table3.A"/>
        <table:table-row>
          <table:table-cell table:style-name="Table3.A1" office:value-type="string">
            <text:p text:style-name="P10"><text:span text:style-name="T8">H7214</text:span></text:p>
            <text:p text:style-name="P10">"רְאֵם <text:s/>(rᵉʼêm | reh-ame')</text:p>
            <text:p text:style-name="P10"/>
            <text:p text:style-name="P10"><text:span text:style-name="T2">Derivation</text:span>: or רְאֵים</text:p>
            <text:p text:style-name="P10"><text:span text:style-name="T2">Typo</text:span>: lemma רְאיֵם second vowel, corrected to רְאֵים; or רֵים; or רֵם; from H7213 רָאַם</text:p>
            <text:p text:style-name="P10"><text:span text:style-name="T2">Strong's</text:span>: <text:span text:style-name="T3">a wild bull</text:span> (from its conspicuousness)</text:p>
            <text:p text:style-name="P10"><text:span text:style-name="T2">KJV</text:span>: unicorn.</text:p>
            <text:p text:style-name="P10"/>
            <text:p text:style-name="P10"><text:span text:style-name="T2">Cognate Group</text:span>: H7214 (unicorn), H7213 (be lifted up), H7215 (coral), H7208 (Reumah)</text:p>
          </table:table-cell>
        </table:table-row>
      </table:table>
      <text:list text:style-name="L3">
        <text:list-item>
          <text:p text:style-name="P11">“Unicorn” is Latin for “one-horn”. Bulls have two horn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ext:soft-page-break/>
        <table:table-row>
          <table:table-cell table:style-name="Table4.A1" office:value-type="string">
            <text:p text:style-name="P13"><text:span text:style-name="T9">H7489</text:span></text:p>
            <text:p text:style-name="P14">רָעַע <text:s/>(râʻaʻ | raw-ah')</text:p>
            <text:p text:style-name="P14"/>
            <text:p text:style-name="P15"><text:span text:style-name="T2">Derivation</text:span>: a primitive root</text:p>
            <text:p text:style-name="P16"><text:span text:style-name="T2">Strong's</text:span>: properly, to spoil (literally, by breaking to pieces); figuratively, to make (or be) good fornothing, i.e. bad (physically, socially or morally)</text:p>
            <text:p text:style-name="P16"><text:span text:style-name="T2">KJV</text:span>: afflict, associate selves (<text:span text:style-name="T3">by mistake for H7462 רָעָה </text:span>), break (down, in pieces), [phrase] displease, (be, bring, do) evil (doer, entreat, man), show self friendly (<text:span text:style-name="T3">by mistake for H7462 רָעָה </text:span>), do harm, (do) hurt, (behave self, deal) ill, [idiom] indeed, do mischief, punish, still, vex, (do) wicked (doer, -ly), be (deal, do) worse.</text:p>
            <text:p text:style-name="P14"/>
            <text:p text:style-name="P14"><text:span text:style-name="T2">Cognate Group</text:span>: H7451 (adversity), H7455 ([idiom] be so bad), H7489 (afflict), H4827 (do mischief)</text:p>
            <text:p text:style-name="P14"><text:span text:style-name="T2">Greek Equivalents</text:span>: G91 ἀδικέω, G683 ἀπωθέομαι, G765 ἀσεβής, G889 ἀχρειόω, G926 βαρύς, G940 βασκαίνω, G2554 κακοποιέω, G2555 κακοποιός, G2556 κακός, G2559 κακόω, G3076 λυπέω, G4190 πονηρός, G4190 πονηρός, G4191 πονηρότερος, G4191 πονηρότερος, G4931 συντελέω, G5015 ταράσσω</text:p>
          </table:table-cell>
        </table:table-row>
      </table:table>
      <text:list text:style-name="L4">
        <text:list-item>
          <text:p text:style-name="P17">Instead of trying to understand the proverb, <text:span text:style-name="T10">which requires the original word, </text:span>Strong’s assumes that the word being there is just a mistake (<text:span text:style-name="T4">Proverbs 18:24</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7:50.098796766</meta:creation-date>
    <dc:title>default</dc:title>
    <meta:editing-duration>PT3H53M52S</meta:editing-duration>
    <meta:editing-cycles>23</meta:editing-cycles>
    <meta:generator>LibreOffice/26.2.4.2$Linux_X86_64 LibreOffice_project/c44d3140fc62714965bf5d98735e0d79ba4b1ebd</meta:generator>
    <dc:date>2026-06-13T11:33:38.399410512</dc:date>
    <meta:document-statistic meta:table-count="4" meta:image-count="0" meta:object-count="0" meta:page-count="2" meta:paragraph-count="35" meta:word-count="343" meta:character-count="2149" meta:non-whitespace-character-count="1842"/>
    <meta:template xlink:type="simple" xlink:actuate="onRequest" xlink:title="default" xlink:href="../../../../Templates/default.ott" meta:date="2026-06-13T07:07:49.074224861"/>
  </office:meta>
</office:document-meta>
</file>