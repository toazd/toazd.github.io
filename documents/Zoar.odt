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able_20_Contents">
      <style:text-properties officeooo:rsid="00994aad" officeooo:paragraph-rsid="00994aad"/>
    </style:style>
    <style:style style:name="P2" style:family="paragraph" style:parent-style-name="Table_20_Contents">
      <style:text-properties officeooo:rsid="001341fb" officeooo:paragraph-rsid="001341fb"/>
    </style:style>
    <style:style style:name="P3" style:family="paragraph" style:parent-style-name="Table_20_Contents">
      <style:text-properties officeooo:rsid="001582aa" officeooo:paragraph-rsid="001582aa"/>
    </style:style>
    <style:style style:name="P4" style:family="paragraph" style:parent-style-name="Table_20_Contents" style:list-style-name="L1">
      <style:text-properties officeooo:rsid="001582aa" officeooo:paragraph-rsid="001582aa"/>
    </style:style>
    <style:style style:name="P5" style:family="paragraph" style:parent-style-name="Table_20_Contents" style:list-style-name="L1">
      <style:text-properties officeooo:rsid="00179c76" officeooo:paragraph-rsid="00179c76"/>
    </style:style>
    <style:style style:name="P6" style:family="paragraph" style:parent-style-name="Table_20_Contents">
      <style:text-properties officeooo:rsid="001b48fd" officeooo:paragraph-rsid="001b48fd"/>
    </style:style>
    <style:style style:name="P7" style:family="paragraph" style:parent-style-name="Table_20_Contents">
      <style:text-properties officeooo:rsid="001f0989" officeooo:paragraph-rsid="0020d4cc"/>
    </style:style>
    <style:style style:name="P8" style:family="paragraph" style:parent-style-name="Table_20_Contents">
      <style:text-properties officeooo:rsid="0024f930" officeooo:paragraph-rsid="0024f930"/>
    </style:style>
    <style:style style:name="P9" style:family="paragraph" style:parent-style-name="Table_20_Contents">
      <style:text-properties officeooo:rsid="003307e7" officeooo:paragraph-rsid="003307e7"/>
    </style:style>
    <style:style style:name="P10" style:family="paragraph" style:parent-style-name="Table_20_Contents">
      <style:text-properties officeooo:rsid="003307e7" officeooo:paragraph-rsid="0033a95f"/>
    </style:style>
    <style:style style:name="P11" style:family="paragraph" style:parent-style-name="Table_20_Contents">
      <style:text-properties officeooo:rsid="003307e7" officeooo:paragraph-rsid="005c3cf0"/>
    </style:style>
    <style:style style:name="P12" style:family="paragraph" style:parent-style-name="Table_20_Contents">
      <style:text-properties officeooo:rsid="007a4ef3" officeooo:paragraph-rsid="007a4ef3"/>
    </style:style>
    <style:style style:name="P13" style:family="paragraph" style:parent-style-name="Table_20_Contents">
      <style:text-properties officeooo:rsid="007c88aa" officeooo:paragraph-rsid="007c88aa"/>
    </style:style>
    <style:style style:name="P14" style:family="paragraph" style:parent-style-name="Table_20_Contents">
      <style:text-properties officeooo:rsid="00391fda" officeooo:paragraph-rsid="00391fda"/>
    </style:style>
    <style:style style:name="T1" style:family="text">
      <style:text-properties officeooo:rsid="0082f7a6"/>
    </style:style>
    <style:style style:name="T2" style:family="text">
      <style:text-properties officeooo:rsid="008f12ec"/>
    </style:style>
    <style:style style:name="T3" style:family="text">
      <style:text-properties officeooo:rsid="001435cc"/>
    </style:style>
    <style:style style:name="T4" style:family="text">
      <style:text-properties officeooo:rsid="001582aa"/>
    </style:style>
    <style:style style:name="T5" style:family="text">
      <style:text-properties officeooo:rsid="0067b8d4"/>
    </style:style>
    <style:style style:name="T6" style:family="text">
      <style:text-properties officeooo:rsid="0051ef79"/>
    </style:style>
    <style:style style:name="T7" style:family="text">
      <style:text-properties officeooo:rsid="0016b5aa"/>
    </style:style>
    <style:style style:name="T8" style:family="text">
      <style:text-properties officeooo:rsid="001ad949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562d39"/>
    </style:style>
    <style:style style:name="T11" style:family="text">
      <style:text-properties officeooo:rsid="00563ce6"/>
    </style:style>
    <style:style style:name="T12" style:family="text">
      <style:text-properties officeooo:rsid="0021bad1"/>
    </style:style>
    <style:style style:name="T13" style:family="text">
      <style:text-properties officeooo:rsid="0022a2bb"/>
    </style:style>
    <style:style style:name="T14" style:family="text">
      <style:text-properties style:text-underline-style="solid" style:text-underline-width="auto" style:text-underline-color="font-color" officeooo:rsid="0022a2bb"/>
    </style:style>
    <style:style style:name="T15" style:family="text">
      <style:text-properties style:text-underline-style="solid" style:text-underline-width="auto" style:text-underline-color="font-color" officeooo:rsid="00291523"/>
    </style:style>
    <style:style style:name="T16" style:family="text">
      <style:text-properties officeooo:rsid="00291523"/>
    </style:style>
    <style:style style:name="T17" style:family="text">
      <style:text-properties officeooo:rsid="0023d795"/>
    </style:style>
    <style:style style:name="T18" style:family="text">
      <style:text-properties style:text-underline-style="solid" style:text-underline-width="auto" style:text-underline-color="font-color" officeooo:rsid="0023d795"/>
    </style:style>
    <style:style style:name="T19" style:family="text">
      <style:text-properties officeooo:rsid="0061b89b"/>
    </style:style>
    <style:style style:name="T20" style:family="text">
      <style:text-properties officeooo:rsid="002533d8"/>
    </style:style>
    <style:style style:name="T21" style:family="text">
      <style:text-properties officeooo:rsid="002d0ec7"/>
    </style:style>
    <style:style style:name="T22" style:family="text">
      <style:text-properties officeooo:rsid="002b25bc"/>
    </style:style>
    <style:style style:name="T23" style:family="text">
      <style:text-properties officeooo:rsid="007a58b2"/>
    </style:style>
    <style:style style:name="T24" style:family="text">
      <style:text-properties officeooo:rsid="008ff533"/>
    </style:style>
    <style:style style:name="T25" style:family="text">
      <style:text-properties officeooo:rsid="0025ac41"/>
    </style:style>
    <style:style style:name="T26" style:family="text">
      <style:text-properties officeooo:rsid="005a825f"/>
    </style:style>
    <style:style style:name="T27" style:family="text">
      <style:text-properties officeooo:rsid="00624849"/>
    </style:style>
    <style:style style:name="T28" style:family="text">
      <style:text-properties officeooo:rsid="0033529a"/>
    </style:style>
    <style:style style:name="T29" style:family="text">
      <style:text-properties officeooo:rsid="0033a95f"/>
    </style:style>
    <style:style style:name="T30" style:family="text">
      <style:text-properties officeooo:rsid="0064a1a0"/>
    </style:style>
    <style:style style:name="T31" style:family="text">
      <style:text-properties officeooo:rsid="006651b7"/>
    </style:style>
    <style:style style:name="T32" style:family="text">
      <style:text-properties officeooo:rsid="002e9068"/>
    </style:style>
    <style:style style:name="T33" style:family="text">
      <style:text-properties officeooo:rsid="002f94e7"/>
    </style:style>
    <style:style style:name="T34" style:family="text">
      <style:text-properties officeooo:rsid="00376ab3"/>
    </style:style>
    <style:style style:name="T35" style:family="text">
      <style:text-properties officeooo:rsid="0095979b"/>
    </style:style>
    <style:style style:name="T36" style:family="text">
      <style:text-properties officeooo:rsid="00391fda"/>
    </style:style>
    <style:style style:name="T37" style:family="text">
      <style:text-properties officeooo:rsid="0087855b"/>
    </style:style>
    <style:style style:name="T38" style:family="text">
      <style:text-properties officeooo:rsid="006b2a02"/>
    </style:style>
    <style:style style:name="T39" style:family="text">
      <style:text-properties officeooo:rsid="00768825"/>
    </style:style>
    <style:style style:name="T40" style:family="text">
      <style:text-properties officeooo:rsid="0070e79b"/>
    </style:style>
    <style:style style:name="T41" style:family="text">
      <style:text-properties officeooo:rsid="004a360d"/>
    </style:style>
    <style:style style:name="T42" style:family="text">
      <style:text-properties officeooo:rsid="006fce3a"/>
    </style:style>
    <style:style style:name="T43" style:family="text">
      <style:text-properties officeooo:rsid="006c06da"/>
    </style:style>
    <style:style style:name="T44" style:family="text">
      <style:text-properties officeooo:rsid="0077a4a6"/>
    </style:style>
    <style:style style:name="T45" style:family="text">
      <style:text-properties officeooo:rsid="00711d29"/>
    </style:style>
    <style:style style:name="T46" style:family="text">
      <style:text-properties officeooo:rsid="0072f871"/>
    </style:style>
    <style:style style:name="T47" style:family="text">
      <style:text-properties officeooo:rsid="0074e27b"/>
    </style:style>
    <style:style style:name="T48" style:family="text">
      <style:text-properties officeooo:rsid="008887fa"/>
    </style:style>
    <style:style style:name="T49" style:family="text">
      <style:text-properties officeooo:rsid="007b8e08"/>
    </style:style>
    <style:style style:name="T50" style:family="text">
      <style:text-properties officeooo:rsid="007c3afe"/>
    </style:style>
    <style:style style:name="T51" style:family="text">
      <style:text-properties officeooo:rsid="007a4ef3"/>
    </style:style>
    <style:style style:name="T52" style:family="text">
      <style:text-properties fo:color="#ff0000" loext:opacity="100%" officeooo:rsid="007a4ef3"/>
    </style:style>
    <style:style style:name="T53" style:family="text">
      <style:text-properties fo:color="#ff0000" loext:opacity="100%" style:text-underline-style="solid" style:text-underline-width="auto" style:text-underline-color="font-color" officeooo:rsid="007a4ef3"/>
    </style:style>
    <style:style style:name="T54" style:family="text">
      <style:text-properties officeooo:rsid="0040123f"/>
    </style:style>
    <style:style style:name="T55" style:family="text">
      <style:text-properties officeooo:rsid="004a274f"/>
    </style:style>
    <style:style style:name="T56" style:family="text">
      <style:text-properties officeooo:rsid="0096b150"/>
    </style:style>
    <style:style style:name="T57" style:family="text">
      <style:text-properties officeooo:rsid="008a06b8"/>
    </style:style>
    <style:style style:name="T58" style:family="text">
      <style:text-properties fo:color="#ff0000" loext:opacity="100%" officeooo:rsid="008a06b8"/>
    </style:style>
    <style:style style:name="T59" style:family="text">
      <style:text-properties officeooo:rsid="0098094f"/>
    </style:style>
    <style:style style:name="T60" style:family="text">
      <style:text-properties officeooo:rsid="004125a7"/>
    </style:style>
    <style:style style:name="T61" style:family="text">
      <style:text-properties officeooo:rsid="0041f988"/>
    </style:style>
    <style:style style:name="T62" style:family="text">
      <style:text-properties officeooo:rsid="004d5bc7"/>
    </style:style>
    <style:style style:name="T63" style:family="text">
      <style:text-properties officeooo:rsid="004e377c"/>
    </style:style>
    <style:style style:name="T64" style:family="text">
      <style:text-properties officeooo:rsid="00600262"/>
    </style:style>
    <style:style style:name="T65" style:family="text">
      <style:text-properties officeooo:rsid="00808c0f"/>
    </style:style>
    <style:style style:name="T66" style:family="text">
      <style:text-properties officeooo:rsid="0061316b"/>
    </style:style>
    <style:style style:name="T67" style:family="text">
      <style:text-properties officeooo:rsid="0098f302"/>
    </style:style>
    <style:style style:name="T68" style:family="text">
      <style:text-properties officeooo:rsid="0081dc7e"/>
    </style:style>
    <style:style style:name="T69" style:family="text">
      <style:text-properties officeooo:rsid="007e8a6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 12:1-3</text:p>
      <text:p text:style-name="P2"/>
      <text:p text:style-name="P2">After Abraham &amp; Lot left Egypt and <text:span text:style-name="T1">pitched their tents</text:span> between Bethel and Hai (Ai) there was a strife between their herdm<text:span text:style-name="T2">e</text:span>n <text:span text:style-name="T3">(Gen 13:1-7)</text:span>. Abraham suggested that <text:span text:style-name="T3">they separate from each other and Lot chose the “plain of Jordan” to the east </text:span><text:span text:style-name="T4">(Gen 13:8-12).</text:span></text:p>
      <text:p text:style-name="P2"/>
      <text:p text:style-name="P3">Take note <text:span text:style-name="T5">that</text:span>:</text:p>
      <text:list text:style-name="L1">
        <text:list-item>
          <text:p text:style-name="P4">The “plain of Jordan” includes Zoar (<text:span text:style-name="T6">also known as Bela:</text:span><text:span text:style-name="T7"> </text:span><text:span text:style-name="T8">Gen 14:2,8</text:span><text:span text:style-name="T7">).</text:span></text:p>
        </text:list-item>
        <text:list-item>
          <text:p text:style-name="P5">Lot moved around the “plain of Jordan” <text:span text:style-name="T8">because he “dwelled in </text:span>the <text:span text:style-name="T9">cities</text:span> of the plain” (Gen 13:12).</text:p>
        </text:list-item>
      </text:list>
      <text:p text:style-name="P6"/>
      <text:p text:style-name="P7">Fast forward a little and <text:span text:style-name="T10">when the evacuation of </text:span><text:span text:style-name="T11">the righteous in </text:span><text:span text:style-name="T10">Sodom began, </text:span>Lot <text:span text:style-name="T10">was</text:span> instructed to “neither stay thou in <text:span text:style-name="T9">all the plain</text:span>; escape to the mountain, <text:span text:style-name="T9">lest thou be consumed</text:span>” <text:span text:style-name="T12">(</text:span>Genesis 19:17<text:span text:style-name="T12">)</text:span>. <text:span text:style-name="T13">Lot petitions to instead flee to a little city that is </text:span><text:span text:style-name="T14">near </text:span><text:span text:style-name="T15">to Sodom</text:span><text:span text:style-name="T16"> </text:span><text:span text:style-name="T13">(Genesis 19:20) that is known as both Bela and Zoar. </text:span><text:span text:style-name="T17">And then Genesis 19:21:</text:span></text:p>
      <text:p text:style-name="P7"/>
      <text:p text:style-name="P7">“<text:span text:style-name="T17">And he said unto him, See, I have accepted thee concerning this thing also, that </text:span><text:span text:style-name="T18">I will not overthrow this city</text:span><text:span text:style-name="T17">, for the which thou has spoken.”</text:span></text:p>
      <text:p text:style-name="P7"/>
      <text:p text:style-name="P8">Meaning, Zoar, <text:span text:style-name="T19">a city of the plain,</text:span> would have been destroyed were it not for Lot going there. <text:span text:style-name="T20">Further evidence to support</text:span><text:span text:style-name="T21"> </text:span><text:span text:style-name="T20">this</text:span><text:span text:style-name="T22"> </text:span><text:span text:style-name="T20">is </text:span><text:span text:style-name="T23">in </text:span><text:span text:style-name="T20">Genesis 19:</text:span><text:span text:style-name="T24">17,</text:span><text:span text:style-name="T20">25,</text:span><text:span text:style-name="T25">29.</text:span></text:p>
      <text:p text:style-name="P8"/>
      <text:p text:style-name="P9">Before the destruction of Sodom, Gomorrah, and <text:span text:style-name="T26">all the</text:span> plain<text:span text:style-name="T27"> </text:span>Abraham asked God a question (Gen 18:32):</text:p>
      <text:p text:style-name="P9"/>
      <text:p text:style-name="P9">“...Peradventure ten shall be found there. And he said, I will not destroy it for ten’s sake.”</text:p>
      <text:p text:style-name="P9"/>
      <text:p text:style-name="P10">And we might have been left wondering “<text:span text:style-name="T28">peradventure</text:span> <text:span text:style-name="T28">there be one righteous</text:span>?” <text:span text:style-name="T29">but </text:span>God answers that question in the very next chapter <text:span text:style-name="T30">when we read about Lot </text:span><text:span text:style-name="T31">choosing to go to Zoar.</text:span></text:p>
      <text:p text:style-name="P10"/>
      <text:p text:style-name="P11"><text:span text:style-name="T29">And </text:span><text:span text:style-name="T32">so we learn that because of the mere presence of one righteous man, the LORD may withhold or disannul judgment. And that man chose to go there </text:span><text:span text:style-name="T33">on a whim based on his emotions</text:span><text:span text:style-name="T32">. </text:span><text:span text:style-name="T34">What if say, </text:span><text:span text:style-name="T35">instead </text:span><text:span text:style-name="T34">the LORD sends that righteous man like I don’t know maybe Abraham? </text:span><text:span text:style-name="T36">Did God give Abraham an express purpose </text:span><text:span text:style-name="T37">for going</text:span><text:span text:style-name="T36"> to Canaan? </text:span><text:span text:style-name="T38">Was he to build a great nation? Was he to make his name great? </text:span><text:span text:style-name="T39">Nope. </text:span><text:span text:style-name="T38">All Abraham had to do was to obey </text:span><text:span text:style-name="T40">by going </text:span><text:span text:style-name="T41">and </text:span><text:span text:style-name="T40">then </text:span><text:span text:style-name="T41">God gave him incomprehensible promises </text:span><text:span text:style-name="T42">(Gen 12:1-3)</text:span><text:span text:style-name="T41">. </text:span><text:span text:style-name="T43">Included in </text:span><text:span text:style-name="T44">those</text:span><text:span text:style-name="T43"> </text:span><text:span text:style-name="T45">promises to Abraham i</text:span><text:span text:style-name="T43">s this </text:span><text:span text:style-name="T46">small thing that is a big deal</text:span><text:span text:style-name="T43">: “...and thou shalt be a blessing…”. </text:span><text:span text:style-name="T47">But, wait, how was Abraham </text:span><text:span text:style-name="T48">going </text:span><text:span text:style-name="T47">to be a blessing if he wasn’t supposed to do anything? </text:span><text:span text:style-name="T49">Ah, but </text:span><text:span text:style-name="T50">you see, </text:span><text:span text:style-name="T49">that </text:span><text:span text:style-name="T50">is</text:span><text:span text:style-name="T49"> the entire point!</text:span></text:p>
      <text:p text:style-name="P11"/>
      <text:p text:style-name="Table_20_Contents"><text:span text:style-name="T51">Matthew 11:28: </text:span><text:span text:style-name="T52">Come unto me, all ye that labour and are heavy laden, and </text:span><text:span text:style-name="T53">I will give you rest</text:span><text:span text:style-name="T52">.</text:span></text:p>
      <text:p text:style-name="P12">Hebrews 4:3a: For we which have believed do enter into rest</text:p>
      <text:p text:style-name="P13">Hebrews 4:10: For he that is entered into his rest, he also hath ceased from his own works, as God did from his.</text:p>
      <text:p text:style-name="P11"/>
      <text:p text:style-name="P11"><text:span text:style-name="T54">Rest assured it’s safe to assume that the mere presence of a righteous, obedient </text:span><text:span text:style-name="T55">son</text:span><text:span text:style-name="T54"> of God in the land of Canaan had untold blessings raining down </text:span><text:span text:style-name="T56">all </text:span><text:span text:style-name="T54">around him.</text:span></text:p>
      <text:p text:style-name="P11"/>
      <text:p text:style-name="Table_20_Contents"><text:span text:style-name="T57">Matthew 22:38: </text:span><text:span text:style-name="T58">This is the first and great commandment.</text:span></text:p>
      <text:p text:style-name="Table_20_Contents">Genesis 15:1<text:span text:style-name="T59">b</text:span>: I am thy shield, and thy exceeding great reward.</text:p>
      <text:p text:style-name="P14"/>
      <text:p text:style-name="P14">And that is <text:span text:style-name="T60">exactly </text:span>how this topic ties back to our conversation where I mentioned something to the effect of “<text:span text:style-name="T61">for all we know, </text:span>fruit for the LORD could be me going to the grocery store”. <text:span text:style-name="T43">Does the Lord send us places? Do we need to go places to obey the Lord? </text:span><text:span text:style-name="T62">How many “</text:span><text:span text:style-name="T63">random” </text:span><text:span text:style-name="T62">people have been blessed by </text:span><text:span text:style-name="T64">God because of </text:span><text:span text:style-name="T62">the mere presence of a righteous person not because of anything they </text:span><text:span text:style-name="T65">do</text:span><text:span text:style-name="T62"> but because </text:span><text:span text:style-name="T66">a portal to </text:span><text:span text:style-name="T67">His</text:span><text:span text:style-name="T66"> riches </text:span><text:span text:style-name="T67">in</text:span><text:span text:style-name="T66"> glory </text:span><text:span text:style-name="T67">by</text:span><text:span text:style-name="T66"> Christ Jesus is </text:span><text:span text:style-name="T68">nigh</text:span><text:span text:style-name="T69"> unto them</text:span><text:span text:style-name="T66">?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1T12:00:55.255666100</meta:creation-date>
    <dc:title>default</dc:title>
    <meta:editing-duration>PT5H3M38S</meta:editing-duration>
    <meta:editing-cycles>135</meta:editing-cycles>
    <meta:generator>LibreOffice/26.2.4.2$Linux_X86_64 LibreOffice_project/64a984c51f4702dbd3710b13428c673a2f1292e7</meta:generator>
    <meta:initial-creator>William K. McDannell Jr.</meta:initial-creator>
    <dc:date>2026-07-11T12:20:11.270593711</dc:date>
    <meta:document-statistic meta:table-count="0" meta:image-count="0" meta:object-count="0" meta:page-count="1" meta:paragraph-count="19" meta:word-count="602" meta:character-count="3234" meta:non-whitespace-character-count="2653"/>
    <meta:template xlink:type="simple" xlink:actuate="onRequest" xlink:title="default" xlink:href="../../../../AppData/Roaming/LibreOffice/4/user/template/default.ott" meta:date="2025-12-01T12:00:54.703853000"/>
  </office:meta>
</office:document-meta>
</file>