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3" style:family="table">
      <style:table-properties style:width="8.1in" table:align="margins" style:may-break-between-rows="true" table:border-model="collapsing"/>
    </style:style>
    <style:style style:name="Table13.A" style:family="table-column">
      <style:table-column-properties style:column-width="2.9451in" style:rel-column-width="23828*"/>
    </style:style>
    <style:style style:name="Table13.B" style:family="table-column">
      <style:table-column-properties style:column-width="3.3701in" style:rel-column-width="27266*"/>
    </style:style>
    <style:style style:name="Table13.C" style:family="table-column">
      <style:table-column-properties style:column-width="1.7847in" style:rel-column-width="14441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in" fo:border-left="none" fo:border-right="none" fo:border-top="0.75pt solid #000000" fo:border-bottom="none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break-before="page"/>
      <style:text-properties style:font-name="Liberation Sans" fo:font-size="11pt" officeooo:rsid="0115ac8c" officeooo:paragraph-rsid="001329f3" style:font-size-asian="11pt" style:font-size-complex="11pt"/>
    </style:style>
    <style:style style:name="P2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2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981" officeooo:paragraph-rsid="002029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f0373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f0373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04cc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04cc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aba8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c9b5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aba8" officeooo:paragraph-rsid="00165d28" fo:background-color="#ffb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65d28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65d28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30f" officeooo:paragraph-rsid="0020e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30f" officeooo:paragraph-rsid="0020e30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30f" officeooo:paragraph-rsid="0020e30f" fo:background-color="#ffb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master-page-name="">
      <style:paragraph-properties style:page-number="auto" fo:break-before="auto" fo:break-after="auto"/>
      <style:text-properties style:font-name="Liberation Sans" fo:font-size="11pt" officeooo:rsid="0088b18d" officeooo:paragraph-rsid="001329f3" style:font-size-asian="11pt" style:font-size-complex="11pt"/>
    </style:style>
    <style:style style:name="P18" style:family="paragraph" style:parent-style-name="Standard">
      <style:text-properties style:font-name="Liberation Sans" fo:font-size="11pt" officeooo:rsid="011a5c18" officeooo:paragraph-rsid="001329f3" style:font-size-asian="11pt" style:font-size-complex="11pt"/>
    </style:style>
    <style:style style:name="T1" style:family="text">
      <style:text-properties officeooo:rsid="01287bb6"/>
    </style:style>
    <style:style style:name="T2" style:family="text">
      <style:text-properties officeooo:rsid="011799c4"/>
    </style:style>
    <style:style style:name="T3" style:family="text">
      <style:text-properties fo:font-style="italic" officeooo:rsid="011799c4" style:font-style-asian="italic" style:font-style-complex="italic"/>
    </style:style>
    <style:style style:name="T4" style:family="text">
      <style:text-properties fo:font-style="normal" officeooo:rsid="011799c4" style:font-style-asian="normal" style:font-style-complex="normal"/>
    </style:style>
    <style:style style:name="T5" style:family="text">
      <style:text-properties fo:font-style="normal" officeooo:rsid="01191e6b" style:font-style-asian="normal" style:font-style-complex="normal"/>
    </style:style>
    <style:style style:name="T6" style:family="text">
      <style:text-properties fo:font-style="normal" officeooo:rsid="0119c6cc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33% 80%"/>
    </style:style>
    <style:style style:name="T9" style:family="text">
      <style:text-properties fo:font-style="italic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text-position="33% 80%" fo:background-color="transparent" loext:char-shading-value="0"/>
    </style:style>
    <style:style style:name="T12" style:family="text">
      <style:text-properties fo:font-style="italic" fo:background-color="transparent" loext:char-shading-value="0"/>
    </style:style>
    <style:style style:name="T13" style:family="text">
      <style:text-properties officeooo:rsid="00ffea0e"/>
    </style:style>
    <style:style style:name="T14" style:family="text">
      <style:text-properties officeooo:rsid="0103003c"/>
    </style:style>
    <style:style style:name="T15" style:family="text">
      <style:text-properties officeooo:rsid="01040794"/>
    </style:style>
    <style:style style:name="T16" style:family="text">
      <style:text-properties officeooo:rsid="0017fb3b"/>
    </style:style>
    <style:style style:name="T17" style:family="text">
      <style:text-properties officeooo:rsid="001947ee"/>
    </style:style>
    <style:style style:name="T18" style:family="text">
      <style:text-properties officeooo:rsid="001b024a"/>
    </style:style>
    <style:style style:name="T19" style:family="text">
      <style:text-properties officeooo:rsid="001c6ff9"/>
    </style:style>
    <style:style style:name="T20" style:family="text">
      <style:text-properties officeooo:rsid="001e4958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116a6fd"/>
    </style:style>
    <style:style style:name="T23" style:family="text">
      <style:text-properties officeooo:rsid="00176c94"/>
    </style:style>
    <style:style style:name="T24" style:family="text">
      <style:text-properties officeooo:rsid="0105498d"/>
    </style:style>
    <style:style style:name="T25" style:family="text">
      <style:text-properties officeooo:rsid="01060d4a"/>
    </style:style>
    <style:style style:name="T26" style:family="text">
      <style:text-properties officeooo:rsid="0112fc8c"/>
    </style:style>
    <style:style style:name="T27" style:family="text">
      <style:text-properties officeooo:rsid="0101aba8"/>
    </style:style>
    <style:style style:name="T28" style:family="text">
      <style:text-properties style:text-position="0% 100%" officeooo:rsid="01062dd0"/>
    </style:style>
    <style:style style:name="T29" style:family="text">
      <style:text-properties style:text-position="0% 100%" officeooo:rsid="010de2fa"/>
    </style:style>
    <style:style style:name="T30" style:family="text">
      <style:text-properties officeooo:rsid="0115ac8c"/>
    </style:style>
    <style:style style:name="T31" style:family="text">
      <style:text-properties officeooo:rsid="0106f4a5"/>
    </style:style>
    <style:style style:name="T32" style:family="text">
      <style:text-properties officeooo:rsid="010846d0"/>
    </style:style>
    <style:style style:name="T33" style:family="text">
      <style:text-properties officeooo:rsid="010de2fa"/>
    </style:style>
    <style:style style:name="T34" style:family="text">
      <style:text-properties style:text-position="0% 100%"/>
    </style:style>
    <style:style style:name="T35" style:family="text">
      <style:text-properties fo:color="#ff0000" loext:opacity="100%" style:text-position="0% 100%"/>
    </style:style>
    <style:style style:name="T36" style:family="text">
      <style:text-properties officeooo:rsid="010c0d57"/>
    </style:style>
    <style:style style:name="T37" style:family="text">
      <style:text-properties officeooo:rsid="010f2921"/>
    </style:style>
    <style:style style:name="T38" style:family="text">
      <style:text-properties style:text-position="super 58%" officeooo:rsid="010f2921"/>
    </style:style>
    <style:style style:name="T39" style:family="text">
      <style:text-properties officeooo:rsid="0116a6fd"/>
    </style:style>
    <style:style style:name="T40" style:family="text">
      <style:text-properties officeooo:rsid="01202799"/>
    </style:style>
    <style:style style:name="T41" style:family="text">
      <style:text-properties officeooo:rsid="011b7d72"/>
    </style:style>
    <style:style style:name="T42" style:family="text">
      <style:text-properties officeooo:rsid="01414f3b"/>
    </style:style>
    <style:style style:name="T43" style:family="text">
      <style:text-properties officeooo:rsid="01267e2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next <text:span text:style-name="T1">example </text:span><text:span text:style-name="T2">shows that when the bible uses “begat” that it does not always mean a </text:span><text:span text:style-name="T3">direct</text:span><text:span text:style-name="T4"> descendant. </text:span><text:span text:style-name="T5">For a quick comparison </text:span><text:span text:style-name="T6">to Matthew 1, refer to</text:span><text:span text:style-name="T5"> 1 Chronicles chapter 3.</text:span></text:p>
      <table:table table:name="Table13" table:style-name="Table13" table:template-name="Academic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3">Matthew 1</text:p>
          </table:table-cell>
          <table:table-cell table:style-name="Table13.A1" office:value-type="string">
            <text:p text:style-name="P3">Luke 3</text:p>
          </table:table-cell>
        </table:table-row>
        <table:table-row table:style-name="Table13.1">
          <table:table-cell table:style-name="Table13.A2" office:value-type="string">
            <text:p text:style-name="P2"><text:span text:style-name="T7">Matthew 1:1-17</text:span><text:line-break/><text:span text:style-name="T8">1</text:span> The book of the generation of Jesus Christ, the son of David, the son of Abraham. <text:line-break/><text:span text:style-name="T8">2</text:span> Abraham begat Isaac; and Isaac begat Jacob; and Jacob begat Judas and his brethren; <text:line-break/><text:span text:style-name="T8">3</text:span> And Judas begat Phares and Zara of Thamar; and Phares begat Esrom; and Esrom begat Aram; <text:line-break/><text:span text:style-name="T8">4</text:span> And Aram begat Aminadab; and Aminadab begat Naasson; and Naasson begat Salmon; <text:line-break/><text:span text:style-name="T8">5</text:span> And Salmon begat Booz of Rachab; and Booz begat Obed of Ruth; and Obed begat Jesse; <text:line-break/><text:span text:style-name="T8">6</text:span> And Jesse begat David the king; and David the king begat Solomon of her <text:span text:style-name="T9">that had been the wife</text:span> of Urias; <text:line-break/><text:span text:style-name="T8">7</text:span> And Solomon begat Roboam; and Roboam begat Abia; and Abia begat Asa; <text:line-break/><text:span text:style-name="T8">8</text:span> And Asa begat Josaphat; and Josaphat begat Joram; and Joram begat Ozias; <text:line-break/><text:span text:style-name="T8">9</text:span> And Ozias begat Joatham; and Joatham begat Achaz; and Achaz begat Ezekias; <text:line-break/><text:span text:style-name="T8">10</text:span> And Ezekias begat Manasses; and Manasses begat Amon; and Amon begat Josias; <text:line-break/><text:span text:style-name="T8">11</text:span> And Josias begat Jechonias and his brethren, about the time they were carried away to Babylon: <text:line-break/><text:span text:style-name="T8">12</text:span> And after they were brought to Babylon, Jechonias begat Salathiel; and Salathiel begat Zorobabel; <text:line-break/><text:span text:style-name="T8">13</text:span> And Zorobabel begat Abiud; and Abiud begat Eliakim; and Eliakim begat Azor; <text:line-break/><text:span text:style-name="T8">14</text:span> And Azor begat Sadoc; and Sadoc begat Achim; and Achim begat Eliud; <text:line-break/><text:span text:style-name="T8">15</text:span> And Eliud begat Eleazar; and Eleazar begat Matthan; and Matthan begat Jacob; <text:line-break/><text:span text:style-name="T8">16</text:span> And Jacob begat Joseph the husband of Mary, of who<text:span text:style-name="T10">m was born Jesus, who is called Christ. <text:line-break/></text:span><text:span text:style-name="T11">17</text:span><text:span text:style-name="T10"> So all the generations from Abraham to David </text:span><text:span text:style-name="T12">are</text:span><text:span text:style-name="T10"> fourteen generations; and from David until the carrying away into Babylon </text:span><text:span text:style-name="T12">are</text:span><text:span text:style-name="T10"> fourteen generations; and from the carrying away into Babylon unto Christ </text:span><text:span text:style-name="T12">are</text:span><text:span text:style-name="T10"> </text:span><text:soft-page-break/><text:span text:style-name="T10">fourteen generations.</text:span></text:p>
          </table:table-cell>
          <table:table-cell table:style-name="Table13.A2" office:value-type="string">
            <text:list xml:id="list3445483161" text:style-name="L1">
              <text:list-item>
                <text:p text:style-name="P4">Abraham</text:p>
              </text:list-item>
              <text:list-item>
                <text:p text:style-name="P5">Isaac</text:p>
              </text:list-item>
              <text:list-item>
                <text:p text:style-name="P5">Jacob</text:p>
              </text:list-item>
              <text:list-item>
                <text:p text:style-name="P5">Judas (Judah) Gen 46:12</text:p>
              </text:list-item>
              <text:list-item>
                <text:p text:style-name="P5">Phares <text:span text:style-name="T13">(Pharez) </text:span><text:span text:style-name="T14">&amp; Zara </text:span><text:span text:style-name="T15">(Zerah)</text:span><text:span text:style-name="T14"> </text:span><text:span text:style-name="T13">Gen 46:12</text:span></text:p>
              </text:list-item>
              <text:list-item>
                <text:p text:style-name="P6"><text:span text:style-name="T16">Hezron/</text:span>Esrom</text:p>
              </text:list-item>
              <text:list-item>
                <text:p text:style-name="P6"><text:span text:style-name="T17">Ram/</text:span>Aram</text:p>
              </text:list-item>
              <text:list-item>
                <text:p text:style-name="P6"><text:span text:style-name="T18">Amminadab/</text:span>Aminadab</text:p>
              </text:list-item>
              <text:list-item>
                <text:p text:style-name="P6"><text:span text:style-name="T19">Nahshon/</text:span>Naasson</text:p>
              </text:list-item>
              <text:list-item>
                <text:p text:style-name="P6">Salmon</text:p>
              </text:list-item>
              <text:list-item>
                <text:p text:style-name="P6"><text:span text:style-name="T20">Boaz/</text:span>Booz</text:p>
              </text:list-item>
              <text:list-item>
                <text:p text:style-name="P6">Obed</text:p>
              </text:list-item>
              <text:list-item>
                <text:p text:style-name="P6">Jesse</text:p>
              </text:list-item>
              <text:list-item>
                <text:p text:style-name="P7">David<text:span text:style-name="T21"> </text:span><text:span text:style-name="T22">1Ch 3</text:span></text:p>
              </text:list-item>
              <text:list-item>
                <text:p text:style-name="P6">Solomon</text:p>
              </text:list-item>
              <text:list-item>
                <text:p text:style-name="P6">R<text:span text:style-name="T23">eh</text:span>oboam</text:p>
              </text:list-item>
              <text:list-item>
                <text:p text:style-name="P6">Abia</text:p>
              </text:list-item>
              <text:list-item>
                <text:p text:style-name="P6">Asa</text:p>
              </text:list-item>
              <text:list-item>
                <text:p text:style-name="P8">Josaphat <text:span text:style-name="T24">(Jehoshaphat 1Ki 15:24</text:span><text:span text:style-name="T25">)</text:span></text:p>
              </text:list-item>
              <text:list-item>
                <text:p text:style-name="P8">Joram <text:span text:style-name="T25">(Jehoram 2Ki 8:16)</text:span></text:p>
              </text:list-item>
            </text:list>
            <text:list text:style-name="L2">
              <text:list-item>
                <text:p text:style-name="P9">Ahaziah <text:span text:style-name="T26">(Azariah/Jehoahaz)</text:span></text:p>
              </text:list-item>
              <text:list-item>
                <text:p text:style-name="P9">Joash <text:span text:style-name="T26">(Jehoash)</text:span></text:p>
              </text:list-item>
              <text:list-item>
                <text:p text:style-name="P9">Amaziah</text:p>
              </text:list-item>
            </text:list>
            <text:list text:continue-list="list3445483161" text:style-name="L1">
              <text:list-item>
                <text:p text:style-name="P10"><text:span text:style-name="T27">Ozias </text:span><text:span text:style-name="T28">(Azariah/Uzziah</text:span><text:span text:style-name="T29">)</text:span></text:p>
              </text:list-item>
              <text:list-item>
                <text:p text:style-name="P8">Joatham <text:span text:style-name="T30">(Jotham)</text:span></text:p>
              </text:list-item>
              <text:list-item>
                <text:p text:style-name="P8">Achaz</text:p>
              </text:list-item>
              <text:list-item>
                <text:p text:style-name="P11">Ezekias <text:span text:style-name="T31">(Hezekiah)</text:span></text:p>
              </text:list-item>
              <text:list-item>
                <text:p text:style-name="P8">Manasses <text:span text:style-name="T31">(Manasseh)</text:span></text:p>
              </text:list-item>
              <text:list-item>
                <text:p text:style-name="P8">Amon</text:p>
              </text:list-item>
              <text:list-item>
                <text:p text:style-name="P11">Josias <text:span text:style-name="T31">(Josiah)</text:span></text:p>
              </text:list-item>
              <text:list-item>
                <text:p text:style-name="P11">Jechonias <text:span text:style-name="T32">(</text:span><text:span text:style-name="T33">Jehoichin/</text:span><text:span text:style-name="T32">Jeconiah)</text:span><text:span text:style-name="T34">(</text:span><text:span text:style-name="T35">Babylon</text:span><text:span text:style-name="T34">)</text:span></text:p>
              </text:list-item>
              <text:list-item>
                <text:p text:style-name="P8">Salathiel <text:span text:style-name="T36">(Shealtiel)</text:span></text:p>
              </text:list-item>
              <text:list-item>
                <text:p text:style-name="P8">Zorobabel <text:span text:style-name="T37">(Zerubbabel) </text:span><text:span text:style-name="T38">Ezr 3:2</text:span></text:p>
              </text:list-item>
              <text:list-item>
                <text:p text:style-name="P8">Abiud</text:p>
              </text:list-item>
              <text:list-item>
                <text:p text:style-name="P8">Eliakim</text:p>
              </text:list-item>
              <text:list-item>
                <text:p text:style-name="P8">Azor</text:p>
              </text:list-item>
              <text:list-item>
                <text:p text:style-name="P8">Sadoc</text:p>
              </text:list-item>
              <text:list-item>
                <text:p text:style-name="P8">Achim</text:p>
              </text:list-item>
              <text:list-item>
                <text:p text:style-name="P8">Eliud</text:p>
              </text:list-item>
              <text:list-item>
                <text:p text:style-name="P8">Eleazar</text:p>
              </text:list-item>
              <text:list-item>
                <text:p text:style-name="P8">Matthan</text:p>
              </text:list-item>
              <text:list-item>
                <text:p text:style-name="P8">Jacob</text:p>
              </text:list-item>
              <text:list-item>
                <text:p text:style-name="P8">Joseph<text:span text:style-name="T34"/></text:p>
              </text:list-item>
              <text:list-item>
                <text:p text:style-name="P12"><text:span text:style-name="T39">J</text:span>esus</text:p>
              </text:list-item>
            </text:list>
            <text:p text:style-name="P13"/>
          </table:table-cell>
          <table:table-cell table:style-name="Table13.A2" office:value-type="string">
            <text:list text:continue-numbering="true" text:style-name="L1">
              <text:list-item text:start-value="1">
                <text:p text:style-name="P14">God</text:p>
              </text:list-item>
              <text:list-item>
                <text:p text:style-name="P14">Adam</text:p>
              </text:list-item>
              <text:list-item>
                <text:p text:style-name="P14">Seth</text:p>
              </text:list-item>
              <text:list-item>
                <text:p text:style-name="P14">Enos</text:p>
              </text:list-item>
              <text:list-item>
                <text:p text:style-name="P14">Cainan</text:p>
              </text:list-item>
              <text:list-item>
                <text:p text:style-name="P14">Maleleel</text:p>
              </text:list-item>
              <text:list-item>
                <text:p text:style-name="P14">Jared</text:p>
              </text:list-item>
              <text:list-item>
                <text:p text:style-name="P14">Enoch</text:p>
              </text:list-item>
              <text:list-item>
                <text:p text:style-name="P14">Mathusala</text:p>
              </text:list-item>
              <text:list-item>
                <text:p text:style-name="P14">Lamech</text:p>
              </text:list-item>
              <text:list-item>
                <text:p text:style-name="P14">Noe</text:p>
              </text:list-item>
              <text:list-item>
                <text:p text:style-name="P14">Sem</text:p>
              </text:list-item>
              <text:list-item>
                <text:p text:style-name="P14">Arphaxad</text:p>
              </text:list-item>
              <text:list-item>
                <text:p text:style-name="P14">Cainan</text:p>
              </text:list-item>
              <text:list-item>
                <text:p text:style-name="P14">Sala</text:p>
              </text:list-item>
              <text:list-item>
                <text:p text:style-name="P14">Heber</text:p>
              </text:list-item>
              <text:list-item>
                <text:p text:style-name="P14">Phalc</text:p>
              </text:list-item>
              <text:list-item>
                <text:p text:style-name="P14">Ragau</text:p>
              </text:list-item>
              <text:list-item>
                <text:p text:style-name="P14">Saruch</text:p>
              </text:list-item>
              <text:list-item>
                <text:p text:style-name="P14">Nachor</text:p>
              </text:list-item>
              <text:list-item>
                <text:p text:style-name="P14">Thara</text:p>
              </text:list-item>
              <text:list-item>
                <text:p text:style-name="P15">Abraham</text:p>
              </text:list-item>
              <text:list-item>
                <text:p text:style-name="P14">Isaac</text:p>
              </text:list-item>
              <text:list-item>
                <text:p text:style-name="P14">Jacob</text:p>
              </text:list-item>
              <text:list-item>
                <text:p text:style-name="P14">Juda</text:p>
              </text:list-item>
              <text:list-item>
                <text:p text:style-name="P14">Phares</text:p>
              </text:list-item>
              <text:list-item>
                <text:p text:style-name="P14">Esrom</text:p>
              </text:list-item>
              <text:list-item>
                <text:p text:style-name="P14">Aram</text:p>
              </text:list-item>
              <text:list-item>
                <text:p text:style-name="P14">Aminadab</text:p>
              </text:list-item>
              <text:list-item>
                <text:p text:style-name="P14">Naasson</text:p>
              </text:list-item>
              <text:list-item>
                <text:p text:style-name="P14">Salmon</text:p>
              </text:list-item>
              <text:list-item>
                <text:p text:style-name="P14">Booz</text:p>
              </text:list-item>
              <text:list-item>
                <text:p text:style-name="P14">Obed</text:p>
              </text:list-item>
              <text:list-item>
                <text:p text:style-name="P14">Jesse</text:p>
              </text:list-item>
              <text:list-item>
                <text:p text:style-name="P15">David</text:p>
              </text:list-item>
              <text:list-item>
                <text:p text:style-name="P14">Nathan</text:p>
              </text:list-item>
              <text:list-item>
                <text:p text:style-name="P14">Mattatha</text:p>
              </text:list-item>
              <text:list-item>
                <text:p text:style-name="P14">Menan</text:p>
              </text:list-item>
              <text:list-item>
                <text:p text:style-name="P14">Melea</text:p>
              </text:list-item>
              <text:list-item>
                <text:p text:style-name="P14">Eliakim</text:p>
              </text:list-item>
              <text:list-item>
                <text:p text:style-name="P14">Jonan</text:p>
              </text:list-item>
              <text:list-item>
                <text:p text:style-name="P14">Joseph</text:p>
              </text:list-item>
              <text:list-item>
                <text:p text:style-name="P14">Juda</text:p>
              </text:list-item>
              <text:list-item>
                <text:p text:style-name="P14">Simeon</text:p>
              </text:list-item>
              <text:list-item>
                <text:p text:style-name="P14">Levi</text:p>
              </text:list-item>
              <text:list-item>
                <text:p text:style-name="P14">Matthat</text:p>
              </text:list-item>
              <text:list-item>
                <text:p text:style-name="P14">Jorim</text:p>
              </text:list-item>
              <text:list-item>
                <text:p text:style-name="P16">Eliezer</text:p>
              </text:list-item>
              <text:list-item>
                <text:p text:style-name="P14">Jose</text:p>
              </text:list-item>
              <text:list-item>
                <text:p text:style-name="P14">Er</text:p>
              </text:list-item>
              <text:list-item>
                <text:p text:style-name="P14">Elmodam</text:p>
              </text:list-item>
              <text:list-item>
                <text:p text:style-name="P14"><text:soft-page-break/>Cosam</text:p>
              </text:list-item>
              <text:list-item>
                <text:p text:style-name="P14">Addi</text:p>
              </text:list-item>
              <text:list-item>
                <text:p text:style-name="P14">Melchi</text:p>
              </text:list-item>
              <text:list-item>
                <text:p text:style-name="P14">Neri</text:p>
              </text:list-item>
              <text:list-item>
                <text:p text:style-name="P14">Salathiel</text:p>
              </text:list-item>
              <text:list-item>
                <text:p text:style-name="P14">Zorobabel</text:p>
              </text:list-item>
              <text:list-item>
                <text:p text:style-name="P14">Rhesa</text:p>
              </text:list-item>
              <text:list-item>
                <text:p text:style-name="P14">Joanna</text:p>
              </text:list-item>
              <text:list-item>
                <text:p text:style-name="P14">Juda</text:p>
              </text:list-item>
              <text:list-item>
                <text:p text:style-name="P14">Joseph</text:p>
              </text:list-item>
              <text:list-item>
                <text:p text:style-name="P16">Semei</text:p>
              </text:list-item>
              <text:list-item>
                <text:p text:style-name="P14">Mattathias</text:p>
              </text:list-item>
              <text:list-item>
                <text:p text:style-name="P14">Maath</text:p>
              </text:list-item>
              <text:list-item>
                <text:p text:style-name="P14">Nagge</text:p>
              </text:list-item>
              <text:list-item>
                <text:p text:style-name="P14">Esli</text:p>
              </text:list-item>
              <text:list-item>
                <text:p text:style-name="P14">Naum</text:p>
              </text:list-item>
              <text:list-item>
                <text:p text:style-name="P14">Amos</text:p>
              </text:list-item>
              <text:list-item>
                <text:p text:style-name="P14">Mattathias</text:p>
              </text:list-item>
              <text:list-item>
                <text:p text:style-name="P14">Joseph</text:p>
              </text:list-item>
              <text:list-item>
                <text:p text:style-name="P14">Janna</text:p>
              </text:list-item>
              <text:list-item>
                <text:p text:style-name="P14">Melchi</text:p>
              </text:list-item>
              <text:list-item>
                <text:p text:style-name="P14">Heli</text:p>
              </text:list-item>
              <text:list-item>
                <text:p text:style-name="P14">Joseph</text:p>
              </text:list-item>
              <text:list-item>
                <text:p text:style-name="P15">Jesus</text:p>
              </text:list-item>
            </text:list>
          </table:table-cell>
        </table:table-row>
      </table:table>
      <text:p text:style-name="P17"/>
      <text:p text:style-name="P18">By studying the genealogies <text:span text:style-name="T40">and succession of kings of Judah </text:span>in 1<text:span text:style-name="T21">st</text:span> &amp; 2<text:span text:style-name="T21">nd</text:span> Chronicles and 1<text:span text:style-name="T21">st</text:span> &amp; 2<text:span text:style-name="T21">nd</text:span> Kings carefully <text:span text:style-name="T41">and then comparing it to </text:span>Matthew 1 <text:span text:style-name="T41">you’ll notice </text:span><text:span text:style-name="T42">in Matthew 1:8</text:span> “...Joram begat Ozias;” <text:span text:style-name="T43">that </text:span><text:span text:style-name="T41">there are 3 kings/sons in succession that are skipped over </text:span><text:span text:style-name="T1">(Ahaziah, Joash, and Amaziah)</text:span><text:span text:style-name="T4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2T16:08:01.413000000</meta:creation-date>
    <dc:date>2026-07-11T12:20:31.530723249</dc:date>
    <meta:editing-duration>PT32M20S</meta:editing-duration>
    <meta:editing-cycles>16</meta:editing-cycles>
    <meta:generator>LibreOffice/26.2.4.2$Linux_X86_64 LibreOffice_project/64a984c51f4702dbd3710b13428c673a2f1292e7</meta:generator>
    <meta:document-statistic meta:table-count="1" meta:image-count="0" meta:object-count="0" meta:page-count="2" meta:paragraph-count="124" meta:word-count="634" meta:character-count="3394" meta:non-whitespace-character-count="2987"/>
  </office:meta>
</office:document-meta>
</file>