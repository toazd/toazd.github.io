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0165in" fo:margin-bottom="0in" style:contextual-spacing="false" fo:text-align="left" style:justify-single-word="false" fo:text-indent="0in" style:auto-text-indent="false" style:writing-mode="lr-tb"/>
      <style:text-properties style:font-name="Liberation Sans" fo:font-size="12pt" style:font-size-asian="12pt" style:font-size-complex="12pt"/>
    </style:style>
    <style:style style:name="T1" style:family="text">
      <style:text-properties fo:color="#417cbe" loext:opacity="100%" fo:font-family="Candara" style:font-family-generic="roman" style:font-pitch="variable" fo:font-size="8pt" fo:font-weight="bold" style:font-size-asian="8pt" style:font-weight-asian="bold"/>
    </style:style>
    <style:style style:name="T2" style:family="text">
      <style:text-properties fo:color="#417cbe" loext:opacity="100%" fo:font-weight="bold" style:font-weight-asian="bold"/>
    </style:style>
    <style:style style:name="T3" style:family="text">
      <style:text-properties fo:color="#000000" loext:opacity="100%"/>
    </style:style>
    <style:style style:name="T4" style:family="text">
      <style:text-properties fo:color="#000001" loext:opacity="100%" fo:font-style="italic" style:font-style-asian="italic"/>
    </style:style>
    <style:style style:name="T5" style:family="text">
      <style:text-properties fo:color="#000000" loext:opacity="100%" fo:font-weight="bold" style:font-weight-asian="bold"/>
    </style:style>
    <style:style style:name="T6" style:family="text">
      <style:text-properties fo:color="#000001" loext:opacity="100%"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Gen 5:13 </text:span><text:span text:style-name="T3">And Cainan lived after he begat Mahalaleel eight hundred and forty years, and begat sons and daughters:</text:span></text:p>
      <text:p text:style-name="P1" loext:marker-style-name="T1"><text:span text:style-name="T2">Gen 7:4 </text:span><text:span text:style-name="T3">For yet seven days, and I will cause it to rain upon the earth forty days and forty nights; and every living substance that I have made will I destroy from off the face of the earth.</text:span></text:p>
      <text:p text:style-name="P1" loext:marker-style-name="T1"><text:span text:style-name="T2">Gen 7:12 </text:span><text:span text:style-name="T3">And the rain was upon the earth forty days and forty nights.</text:span></text:p>
      <text:p text:style-name="P1" loext:marker-style-name="T1"><text:span text:style-name="T2">Gen 7:17 </text:span><text:span text:style-name="T3">And the flood was forty days upon the earth; and the waters increased, and bare up the ark, and it was lift up above the earth.</text:span></text:p>
      <text:p text:style-name="P1" loext:marker-style-name="T1"><text:span text:style-name="T2">Gen 8:6 </text:span><text:span text:style-name="T3">And it came to pass at the end of forty days, that Noah opened the window of the ark which he had made:</text:span></text:p>
      <text:p text:style-name="P1" loext:marker-style-name="T1"><text:span text:style-name="T2">Gen 18:28 </text:span><text:span text:style-name="T3">Peradventure there shall lack five of the fifty righteous: wilt thou destroy all the city for </text:span><text:span text:style-name="T4">lack of</text:span><text:span text:style-name="T3"> five? And he said, If I find there forty and five, I will not destroy </text:span><text:span text:style-name="T4">it</text:span><text:span text:style-name="T3">.</text:span></text:p>
      <text:p text:style-name="P1" loext:marker-style-name="T1"><text:span text:style-name="T2">Gen 18:29 </text:span><text:span text:style-name="T3">And he spake unto him yet again, and said, Peradventure there shall be forty found there. And he said, I will not do </text:span><text:span text:style-name="T4">it</text:span><text:span text:style-name="T3"> for forty's sake.</text:span></text:p>
      <text:p text:style-name="P1" loext:marker-style-name="T1"><text:span text:style-name="T2">Gen 25:20 </text:span><text:span text:style-name="T3">And Isaac was forty years old when he took Rebekah to wife, the daughter of Bethuel the Syrian of Padanaram, the sister to Laban the Syrian.</text:span></text:p>
      <text:p text:style-name="P1" loext:marker-style-name="T1"><text:span text:style-name="T2">Gen 26:34 </text:span><text:span text:style-name="T3">And Esau was forty years old when he took to wife Judith the daughter of Beeri the Hittite, and Bashemath the daughter of Elon the Hittite:</text:span></text:p>
      <text:p text:style-name="P1" loext:marker-style-name="T1"><text:span text:style-name="T2">Gen 32:15 </text:span><text:span text:style-name="T3">Thirty milch camels with their colts, forty kine, and ten bulls, twenty she asses, and ten foals.</text:span></text:p>
      <text:p text:style-name="P1" loext:marker-style-name="T1"><text:span text:style-name="T2">Gen 47:28 </text:span><text:span text:style-name="T3">And Jacob lived in the land of Egypt seventeen years: so the whole age of Jacob was an hundred forty and seven years.</text:span></text:p>
      <text:p text:style-name="P1" loext:marker-style-name="T1"><text:span text:style-name="T2">Gen 50:3 </text:span><text:span text:style-name="T3">And forty days were fulfilled for him; for so are fulfilled the days of those which are embalmed: and the Egyptians mourned for him threescore and ten days.</text:span></text:p>
      <text:p text:style-name="P1" loext:marker-style-name="T1"><text:span text:style-name="T2">Exod 16:35 </text:span><text:span text:style-name="T3">And the children of Israel did eat manna forty years, until they came to a land inhabited; they did eat manna, until they came unto the borders of the land of Canaan.</text:span></text:p>
      <text:p text:style-name="P1" loext:marker-style-name="T1"><text:span text:style-name="T2">Exod 24:18 </text:span><text:span text:style-name="T3">And Moses went into the midst of the cloud, and gat him up into the mount: and Moses was in the mount forty days and forty nights.</text:span></text:p>
      <text:p text:style-name="P1" loext:marker-style-name="T1"><text:span text:style-name="T2">Exod 26:19 </text:span><text:span text:style-name="T3">And thou shalt make forty sockets of silver under the twenty boards; two sockets under one board for his two tenons, and two sockets under another board for his two tenons.</text:span></text:p>
      <text:p text:style-name="P1" loext:marker-style-name="T1"><text:span text:style-name="T2">Exod 26:21 </text:span><text:span text:style-name="T3">And their forty sockets </text:span><text:span text:style-name="T4">of</text:span><text:span text:style-name="T3"> silver; two sockets under one board, and two sockets under another board.</text:span></text:p>
      <text:p text:style-name="P1" loext:marker-style-name="T1"><text:span text:style-name="T2">Exod 34:28 </text:span><text:span text:style-name="T3">And he was there with the LORD forty days and forty nights; he did neither eat bread, nor drink water. And he wrote upon the tables the words of the covenant, the ten commandments.</text:span></text:p>
      <text:p text:style-name="P1" loext:marker-style-name="T1"><text:span text:style-name="T2">Exod 36:24 </text:span><text:span text:style-name="T3">And forty sockets of silver he made under the twenty boards; two sockets under one board for his two tenons, and two sockets under another board for his two tenons.</text:span></text:p>
      <text:p text:style-name="P1" loext:marker-style-name="T1"><text:span text:style-name="T2">Exod 36:26 </text:span><text:span text:style-name="T3">And their forty sockets of silver; two sockets under one board, and two sockets under another board.</text:span></text:p>
      <text:p text:style-name="P1" loext:marker-style-name="T1"><text:span text:style-name="T2">Lev 25:8 </text:span><text:span text:style-name="T3">And thou shalt number seven sabbaths of years unto thee, seven times seven years; and the space of the seven sabbaths of years shall be unto thee forty and nine years.</text:span></text:p>
      <text:p text:style-name="P1" loext:marker-style-name="T1"><text:span text:style-name="T2">Num 1:21 </text:span><text:span text:style-name="T3">Those that were numbered of them, </text:span><text:span text:style-name="T4">even</text:span><text:span text:style-name="T3"> of the tribe of Reuben, </text:span><text:span text:style-name="T4">were</text:span><text:span text:style-name="T3"> forty and six thousand and five hundred.</text:span></text:p>
      <text:p text:style-name="P1" loext:marker-style-name="T1"><text:span text:style-name="T2">Num 1:25 </text:span><text:span text:style-name="T3">Those that were numbered of them, </text:span><text:span text:style-name="T4">even</text:span><text:span text:style-name="T3"> of the tribe of Gad, </text:span><text:span text:style-name="T4">were</text:span><text:span text:style-name="T3"> forty and five thousand six hundred and fifty.</text:span></text:p>
      <text:p text:style-name="P1" loext:marker-style-name="T1"><text:span text:style-name="T2">Num 1:33 </text:span><text:span text:style-name="T3">Those that were numbered of them, </text:span><text:span text:style-name="T4">even</text:span><text:span text:style-name="T3"> of the tribe of Ephraim, </text:span><text:span text:style-name="T4">were</text:span><text:span text:style-name="T3"> forty thousand and five hundred.</text:span></text:p>
      <text:p text:style-name="P1" loext:marker-style-name="T1"><text:soft-page-break/><text:span text:style-name="T2">Num 1:41 </text:span><text:span text:style-name="T3">Those that were numbered of them, </text:span><text:span text:style-name="T4">even</text:span><text:span text:style-name="T3"> of the tribe of Asher, </text:span><text:span text:style-name="T4">were</text:span><text:span text:style-name="T3"> forty and one thousand and five hundred.</text:span></text:p>
      <text:p text:style-name="P1" loext:marker-style-name="T1"><text:span text:style-name="T2">Num 2:11 </text:span><text:span text:style-name="T3">And his host, and those that were numbered thereof, </text:span><text:span text:style-name="T4">were</text:span><text:span text:style-name="T3"> forty and six thousand and five hundred.</text:span></text:p>
      <text:p text:style-name="P1" loext:marker-style-name="T1"><text:span text:style-name="T2">Num 2:15 </text:span><text:span text:style-name="T3">And his host, and those that were numbered of them, </text:span><text:span text:style-name="T4">were</text:span><text:span text:style-name="T3"> forty and five thousand and six hundred and fifty.</text:span></text:p>
      <text:p text:style-name="P1" loext:marker-style-name="T1"><text:span text:style-name="T2">Num 2:19 </text:span><text:span text:style-name="T3">And his host, and those that were numbered of them, </text:span><text:span text:style-name="T4">were</text:span><text:span text:style-name="T3"> forty thousand and five hundred.</text:span></text:p>
      <text:p text:style-name="P1" loext:marker-style-name="T1"><text:span text:style-name="T2">Num 2:28 </text:span><text:span text:style-name="T3">And his host, and those that were numbered of them, </text:span><text:span text:style-name="T4">were</text:span><text:span text:style-name="T3"> forty and one thousand and five hundred.</text:span></text:p>
      <text:p text:style-name="P1" loext:marker-style-name="T1"><text:span text:style-name="T2">Num 13:25 </text:span><text:span text:style-name="T3">And they returned from searching of the land after forty days.</text:span></text:p>
      <text:p text:style-name="P1" loext:marker-style-name="T1"><text:span text:style-name="T2">Num 14:33 </text:span><text:span text:style-name="T3">And your children shall wander in the wilderness forty years, and bear your whoredoms, until your carcases be wasted in the wilderness.</text:span></text:p>
      <text:p text:style-name="P1" loext:marker-style-name="T1"><text:span text:style-name="T2">Num 14:34 </text:span><text:span text:style-name="T3">After the number of the days in which ye searched the land, </text:span><text:span text:style-name="T4">even</text:span><text:span text:style-name="T3"> forty days, each day for a year, shall ye bear your iniquities, </text:span><text:span text:style-name="T4">even</text:span><text:span text:style-name="T3"> forty years, and ye shall know my breach of promise.</text:span></text:p>
      <text:p text:style-name="P1" loext:marker-style-name="T1"><text:span text:style-name="T2">Num 26:7 </text:span><text:span text:style-name="T3">These </text:span><text:span text:style-name="T4">are</text:span><text:span text:style-name="T3"> the families of the Reubenites: and they that were numbered of them were forty and three thousand and seven hundred and thirty.</text:span></text:p>
      <text:p text:style-name="P1" loext:marker-style-name="T1"><text:span text:style-name="T2">Num 26:18 </text:span><text:span text:style-name="T3">These </text:span><text:span text:style-name="T4">are</text:span><text:span text:style-name="T3"> the families of the children of Gad according to those that were numbered of them, forty thousand and five hundred.</text:span></text:p>
      <text:p text:style-name="P1" loext:marker-style-name="T1"><text:span text:style-name="T2">Num 26:41 </text:span><text:span text:style-name="T3">These </text:span><text:span text:style-name="T4">are</text:span><text:span text:style-name="T3"> the sons of Benjamin after their families: and they that were numbered of them </text:span><text:span text:style-name="T4">were</text:span><text:span text:style-name="T3"> forty and five thousand and six hundred.</text:span></text:p>
      <text:p text:style-name="P1" loext:marker-style-name="T1"><text:span text:style-name="T2">Num 26:50 </text:span><text:span text:style-name="T3">These </text:span><text:span text:style-name="T4">are</text:span><text:span text:style-name="T3"> the families of Naphtali according to their families: and they that were numbered of them </text:span><text:span text:style-name="T4">were</text:span><text:span text:style-name="T3"> forty and five thousand and four hundred.</text:span></text:p>
      <text:p text:style-name="P1" loext:marker-style-name="T1"><text:span text:style-name="T2">Num 32:13 </text:span><text:span text:style-name="T3">And the LORD'S anger was kindled against Israel, and he made them wander in the wilderness forty years, until all the generation, that had done evil in the sight of the LORD, was consumed.</text:span></text:p>
      <text:p text:style-name="P1" loext:marker-style-name="T1"><text:span text:style-name="T2">Num 35:6 </text:span><text:span text:style-name="T3">And among the cities which ye shall give unto the Levites </text:span><text:span text:style-name="T4">there shall be</text:span><text:span text:style-name="T3"> six cities for refuge, which ye shall appoint for the manslayer, that he may flee thither: and to them ye shall add forty and two cities.</text:span></text:p>
      <text:p text:style-name="P1" loext:marker-style-name="T1"><text:span text:style-name="T2">Num 35:7 </text:span><text:span text:style-name="T4">So</text:span><text:span text:style-name="T3"> all the cities which ye shall give to the Levites </text:span><text:span text:style-name="T4">shall be</text:span><text:span text:style-name="T3"> forty and eight cities: them </text:span><text:span text:style-name="T4">shall ye give</text:span><text:span text:style-name="T3"> with their suburbs.</text:span></text:p>
      <text:p text:style-name="P1" loext:marker-style-name="T1"><text:span text:style-name="T2">Deut 2:7 </text:span><text:span text:style-name="T3">For the LORD thy God hath blessed thee in all the works of thy hand: he knoweth thy walking through this great wilderness: these forty years the LORD thy God </text:span><text:span text:style-name="T4">hath been</text:span><text:span text:style-name="T3"> with thee; thou hast lacked nothing.</text:span></text:p>
      <text:p text:style-name="P1" loext:marker-style-name="T1"><text:span text:style-name="T2">Deut 8:2 </text:span><text:span text:style-name="T3">And thou shalt remember all the way which the LORD thy God led thee these forty years in the wilderness, to humble thee, </text:span><text:span text:style-name="T4">and</text:span><text:span text:style-name="T3"> to prove thee, to know what </text:span><text:span text:style-name="T4">was</text:span><text:span text:style-name="T3"> in thine heart, whether thou wouldest keep his commandments, or no.</text:span></text:p>
      <text:p text:style-name="P1" loext:marker-style-name="T1"><text:span text:style-name="T2">Deut 8:4 </text:span><text:span text:style-name="T3">Thy raiment waxed not old upon thee, neither did thy foot swell, these forty years.</text:span></text:p>
      <text:p text:style-name="P1" loext:marker-style-name="T1"><text:span text:style-name="T2">Deut 9:9 </text:span><text:span text:style-name="T3">When I was gone up into the mount to receive the tables of stone, </text:span><text:span text:style-name="T4">even</text:span><text:span text:style-name="T3"> the tables of the covenant which the LORD made with you, then I abode in the mount forty days and forty nights, I neither did eat bread nor drink water:</text:span></text:p>
      <text:p text:style-name="P1" loext:marker-style-name="T1"><text:span text:style-name="T2">Deut 9:11 </text:span><text:span text:style-name="T3">And it came to pass at the end of forty days and forty nights, </text:span><text:span text:style-name="T4">that</text:span><text:span text:style-name="T3"> the LORD gave me the two tables of stone, </text:span><text:span text:style-name="T4">even</text:span><text:span text:style-name="T3"> the tables of the covenant.</text:span></text:p>
      <text:p text:style-name="P1" loext:marker-style-name="T1"><text:span text:style-name="T2">Deut 9:18 </text:span><text:span text:style-name="T3">And I fell down before the LORD, as at the first, forty days and forty nights: I did neither eat bread, nor drink water, because of all your sins which ye sinned, in doing wickedly in the sight of the LORD, to provoke him to anger.</text:span></text:p>
      <text:p text:style-name="P1" loext:marker-style-name="T1"><text:soft-page-break/><text:span text:style-name="T2">Deut 9:25 </text:span><text:span text:style-name="T3">Thus I fell down before the LORD forty days and forty nights, as I fell down </text:span><text:span text:style-name="T4">at the first</text:span><text:span text:style-name="T3">; because the LORD had said he would destroy you.</text:span></text:p>
      <text:p text:style-name="P1" loext:marker-style-name="T1"><text:span text:style-name="T2">Deut 10:10 </text:span><text:span text:style-name="T3">And I stayed in the mount, according to the first time, forty days and forty nights; and the LORD hearkened unto me at that time also, </text:span><text:span text:style-name="T4">and</text:span><text:span text:style-name="T3"> the LORD would not destroy thee.</text:span></text:p>
      <text:p text:style-name="P1" loext:marker-style-name="T1"><text:span text:style-name="T2">Deut 25:3 </text:span><text:span text:style-name="T3">Forty stripes he may give him, </text:span><text:span text:style-name="T4">and</text:span><text:span text:style-name="T3"> not exceed: lest, </text:span><text:span text:style-name="T4">if</text:span><text:span text:style-name="T3"> he should exceed, and beat him above these with many stripes, then thy brother should seem vile unto thee.</text:span></text:p>
      <text:p text:style-name="P1" loext:marker-style-name="T1"><text:span text:style-name="T2">Deut 29:5 </text:span><text:span text:style-name="T3">And I have led you forty years in the wilderness: your clothes are not waxen old upon you, and thy shoe is not waxen old upon thy foot.</text:span></text:p>
      <text:p text:style-name="P1" loext:marker-style-name="T1"><text:span text:style-name="T2">Josh 4:13 </text:span><text:span text:style-name="T3">About forty thousand prepared for war passed over before the LORD unto battle, to the plains of Jericho.</text:span></text:p>
      <text:p text:style-name="P1" loext:marker-style-name="T1"><text:span text:style-name="T2">Josh 5:6 </text:span><text:span text:style-name="T3">For the children of Israel walked forty years in the wilderness, till all the people </text:span><text:span text:style-name="T4">that were</text:span><text:span text:style-name="T3"> men of war, which came out of Egypt, were consumed, because they obeyed not the voice of the LORD: unto whom the LORD sware that he would not shew them the land, which the LORD sware unto their fathers that he would give us, a land that floweth with milk and honey.</text:span></text:p>
      <text:p text:style-name="P1" loext:marker-style-name="T1"><text:span text:style-name="T2">Josh 14:7 </text:span><text:span text:style-name="T3">Forty years old </text:span><text:span text:style-name="T4">was</text:span><text:span text:style-name="T3"> I when Moses the servant of the LORD sent me from Kadeshbarnea to espy out the land; and I brought him word again as </text:span><text:span text:style-name="T4">it was</text:span><text:span text:style-name="T3"> in mine heart.</text:span></text:p>
      <text:p text:style-name="P1" loext:marker-style-name="T1"><text:span text:style-name="T2">Josh 14:10 </text:span><text:span text:style-name="T3">And now, behold, the LORD hath kept me alive, as he said, these forty and five years, even since the LORD spake this word unto Moses, while </text:span><text:span text:style-name="T4">the children of</text:span><text:span text:style-name="T3"> Israel wandered in the wilderness: and now, lo, I </text:span><text:span text:style-name="T4">am</text:span><text:span text:style-name="T3"> this day fourscore and five years old.</text:span></text:p>
      <text:p text:style-name="P1" loext:marker-style-name="T1"><text:span text:style-name="T2">Josh 21:41 </text:span><text:span text:style-name="T3">All the cities of the Levites within the possession of the children of Israel </text:span><text:span text:style-name="T4">were</text:span><text:span text:style-name="T3"> forty and eight cities with their suburbs.</text:span></text:p>
      <text:p text:style-name="P1" loext:marker-style-name="T1"><text:span text:style-name="T2">Judg 3:11 </text:span><text:span text:style-name="T3">And the land had rest forty years. And Othniel the son of Kenaz died.</text:span></text:p>
      <text:p text:style-name="P1" loext:marker-style-name="T1"><text:span text:style-name="T2">Judg 5:8 </text:span><text:span text:style-name="T3">They chose new gods; then </text:span><text:span text:style-name="T4">was</text:span><text:span text:style-name="T3"> war in the gates: was there a shield or spear seen among forty thousand in Israel?</text:span></text:p>
      <text:p text:style-name="P1" loext:marker-style-name="T1"><text:span text:style-name="T2">Judg 5:31 </text:span><text:span text:style-name="T3">So let all thine enemies perish, O LORD: but </text:span><text:span text:style-name="T4">let</text:span><text:span text:style-name="T3"> them that love him </text:span><text:span text:style-name="T4">be</text:span><text:span text:style-name="T3"> as the sun when he goeth forth in his might. And the land had rest forty years.</text:span></text:p>
      <text:p text:style-name="P1" loext:marker-style-name="T1"><text:span text:style-name="T2">Judg 8:28 </text:span><text:span text:style-name="T3">Thus was Midian subdued before the children of Israel, so that they lifted up their heads no more. And the country was in quietness forty years in the days of Gideon.</text:span></text:p>
      <text:p text:style-name="P1" loext:marker-style-name="T1"><text:span text:style-name="T2">Judg 12:6 </text:span><text:span text:style-name="T3">Then said they unto him, Say now Shibboleth: and he said Sibboleth: for he could not frame to pronounce </text:span><text:span text:style-name="T4">it</text:span><text:span text:style-name="T3"> right. Then they took him, and slew him at the passages of Jordan: and there fell at that time of the Ephraimites forty and two thousand.</text:span></text:p>
      <text:p text:style-name="P1" loext:marker-style-name="T1"><text:span text:style-name="T2">Judg 12:14 </text:span><text:span text:style-name="T3">And he had forty sons and thirty nephews, that rode on threescore and ten ass colts: and he judged Israel eight years.</text:span></text:p>
      <text:p text:style-name="P1" loext:marker-style-name="T1"><text:span text:style-name="T2">Judg 13:1 </text:span><text:span text:style-name="T3">And the children of Israel did evil again in the sight of the LORD; and the LORD delivered them into the hand of the Philistines forty years.</text:span></text:p>
      <text:p text:style-name="P1" loext:marker-style-name="T1"><text:span text:style-name="T2">1Sam 4:18 </text:span><text:span text:style-name="T3">And it came to pass, when he made mention of the ark of God, that he fell from off the seat backward by the side of the gate, and his neck brake, and he died: for he was an old man, and heavy. And he had judged Israel forty years.</text:span></text:p>
      <text:p text:style-name="P1" loext:marker-style-name="T1"><text:span text:style-name="T2">1Sam 17:16 </text:span><text:span text:style-name="T3">And the Philistine drew near morning and evening, and presented himself forty days.</text:span></text:p>
      <text:p text:style-name="P1" loext:marker-style-name="T1"><text:span text:style-name="T2">2Sam 2:10 </text:span><text:span text:style-name="T3">Ishbosheth Saul's son </text:span><text:span text:style-name="T4">was</text:span><text:span text:style-name="T3"> forty years old when he began to reign over Israel, and reigned two years. But the house of Judah followed David.</text:span></text:p>
      <text:p text:style-name="P1" loext:marker-style-name="T1"><text:span text:style-name="T2">2Sam 5:4 </text:span><text:span text:style-name="T3">David </text:span><text:span text:style-name="T4">was</text:span><text:span text:style-name="T3"> thirty years old when he began to reign, </text:span><text:span text:style-name="T4">and</text:span><text:span text:style-name="T3"> he reigned forty years.</text:span></text:p>
      <text:p text:style-name="P1" loext:marker-style-name="T1"><text:span text:style-name="T2">2Sam 10:18 </text:span><text:span text:style-name="T3">And the Syrians fled before Israel; and David slew </text:span><text:span text:style-name="T4">the men of</text:span><text:span text:style-name="T3"> seven hundred chariots of the Syrians, and forty thousand horsemen, and smote Shobach the captain of their host, who died there.</text:span></text:p>
      <text:p text:style-name="P1" loext:marker-style-name="T1"><text:soft-page-break/><text:span text:style-name="T2">2Sam 15:7 </text:span><text:span text:style-name="T3">And it came to pass after forty years, that Absalom said unto the king, I pray thee, let me go and pay my vow, which I have vowed unto the LORD, in Hebron.</text:span></text:p>
      <text:p text:style-name="P1" loext:marker-style-name="T1"><text:span text:style-name="T2">1Kgs 2:11 </text:span><text:span text:style-name="T3">And the days that David reigned over Israel </text:span><text:span text:style-name="T4">were</text:span><text:span text:style-name="T3"> forty years: seven years reigned he in Hebron, and thirty and three years reigned he in Jerusalem.</text:span></text:p>
      <text:p text:style-name="P1" loext:marker-style-name="T1"><text:span text:style-name="T2">1Kgs 4:26 </text:span><text:span text:style-name="T3">And Solomon had forty thousand stalls of horses for his chariots, and twelve thousand horsemen.</text:span></text:p>
      <text:p text:style-name="P1" loext:marker-style-name="T1"><text:span text:style-name="T2">1Kgs 6:17 </text:span><text:span text:style-name="T3">And the house, that </text:span><text:span text:style-name="T4">is</text:span><text:span text:style-name="T3">, the temple before it, was forty cubits </text:span><text:span text:style-name="T4">long</text:span><text:span text:style-name="T3">.</text:span></text:p>
      <text:p text:style-name="P1" loext:marker-style-name="T1"><text:span text:style-name="T2">1Kgs 7:3 </text:span><text:span text:style-name="T3">And </text:span><text:span text:style-name="T4">it was</text:span><text:span text:style-name="T3"> covered with cedar above upon the beams, that </text:span><text:span text:style-name="T4">lay</text:span><text:span text:style-name="T3"> on forty five pillars, fifteen </text:span><text:span text:style-name="T4">in</text:span><text:span text:style-name="T3"> a row.</text:span></text:p>
      <text:p text:style-name="P1" loext:marker-style-name="T1"><text:span text:style-name="T2">1Kgs 7:38 </text:span><text:span text:style-name="T3">Then made he ten lavers of brass: one laver contained forty baths: </text:span><text:span text:style-name="T4">and</text:span><text:span text:style-name="T3"> every laver was four cubits: </text:span><text:span text:style-name="T4">and</text:span><text:span text:style-name="T3"> upon every one of the ten bases one laver.</text:span></text:p>
      <text:p text:style-name="P1" loext:marker-style-name="T1"><text:span text:style-name="T2">1Kgs 11:42 </text:span><text:span text:style-name="T3">And the time that Solomon reigned in Jerusalem over all Israel </text:span><text:span text:style-name="T4">was</text:span><text:span text:style-name="T3"> forty years.</text:span></text:p>
      <text:p text:style-name="P1" loext:marker-style-name="T1"><text:span text:style-name="T2">1Kgs 14:21 </text:span><text:span text:style-name="T3">And Rehoboam the son of Solomon reigned in Judah. Rehoboam </text:span><text:span text:style-name="T4">was</text:span><text:span text:style-name="T3"> forty and one years old when he began to reign, and he reigned seventeen years in Jerusalem, the city which the LORD did choose out of all the tribes of Israel, to put his name there. And his mother's name </text:span><text:span text:style-name="T4">was</text:span><text:span text:style-name="T3"> Naamah an Ammonitess.</text:span></text:p>
      <text:p text:style-name="P1" loext:marker-style-name="T1"><text:span text:style-name="T2">1Kgs 15:10 </text:span><text:span text:style-name="T3">And forty and one years reigned he in Jerusalem. And his mother's name </text:span><text:span text:style-name="T4">was</text:span><text:span text:style-name="T3"> Maachah, the daughter of Abishalom.</text:span></text:p>
      <text:p text:style-name="P1" loext:marker-style-name="T1"><text:span text:style-name="T2">1Kgs 19:8 </text:span><text:span text:style-name="T3">And he arose, and did eat and drink, and went in the strength of that meat forty days and forty nights unto Horeb the mount of God.</text:span></text:p>
      <text:p text:style-name="P1" loext:marker-style-name="T1"><text:span text:style-name="T2">2Kgs 2:24 </text:span><text:span text:style-name="T3">And he turned back, and looked on them, and cursed them in the name of the LORD. And there came forth two she bears out of the wood, and tare forty and two children of them.</text:span></text:p>
      <text:p text:style-name="P1" loext:marker-style-name="T1"><text:span text:style-name="T2">2Kgs 8:9 </text:span><text:span text:style-name="T3">So Hazael went to meet him, and took a present with him, even of every good thing of Damascus, forty camels' burden, and came and stood before him, and said, Thy son Benhadad king of Syria hath sent me to thee, saying, Shall I recover of this disease?</text:span></text:p>
      <text:p text:style-name="P1" loext:marker-style-name="T1"><text:span text:style-name="T2">2Kgs 10:14 </text:span><text:span text:style-name="T3">And he said, Take them alive. And they took them alive, and slew them at the pit of the shearing house, </text:span><text:span text:style-name="T4">even</text:span><text:span text:style-name="T3"> two and forty men; neither left he any of them.</text:span></text:p>
      <text:p text:style-name="P1" loext:marker-style-name="T1"><text:span text:style-name="T2">2Kgs 12:1 </text:span><text:span text:style-name="T3">In the seventh year of Jehu Jehoash began to reign; and forty years reigned he in Jerusalem. And his mother's name </text:span><text:span text:style-name="T4">was</text:span><text:span text:style-name="T3"> Zibiah of Beersheba.</text:span></text:p>
      <text:p text:style-name="P1" loext:marker-style-name="T1"><text:span text:style-name="T2">2Kgs 14:23 </text:span><text:span text:style-name="T3">In the fifteenth year of Amaziah the son of Joash king of Judah Jeroboam the son of Joash king of Israel began to reign in Samaria, </text:span><text:span text:style-name="T4">and reigned</text:span><text:span text:style-name="T3"> forty and one years.</text:span></text:p>
      <text:p text:style-name="P1" loext:marker-style-name="T1"><text:span text:style-name="T2">1Chr 5:18 </text:span><text:span text:style-name="T3">The sons of Reuben, and the Gadites, and half the tribe of Manasseh, of valiant men, men able to bear buckler and sword, and to shoot with bow, and skilful in war, </text:span><text:span text:style-name="T4">were</text:span><text:span text:style-name="T3"> four and forty thousand seven hundred and threescore, that went out to the war.</text:span></text:p>
      <text:p text:style-name="P1" loext:marker-style-name="T1"><text:span text:style-name="T2">1Chr 12:36 </text:span><text:span text:style-name="T3">And of Asher, such as went forth to battle, expert in war, forty thousand.</text:span></text:p>
      <text:p text:style-name="P1" loext:marker-style-name="T1"><text:span text:style-name="T2">1Chr 19:18 </text:span><text:span text:style-name="T3">But the Syrians fled before Israel; and David slew of the Syrians seven thousand </text:span><text:span text:style-name="T4">men which fought in</text:span><text:span text:style-name="T3"> chariots, and forty thousand footmen, and killed Shophach the captain of the host.</text:span></text:p>
      <text:p text:style-name="P1" loext:marker-style-name="T1"><text:span text:style-name="T2">1Chr 29:27 </text:span><text:span text:style-name="T3">And the time that he reigned over Israel </text:span><text:span text:style-name="T4">was</text:span><text:span text:style-name="T3"> forty years; seven years reigned he in Hebron, and thirty and three </text:span><text:span text:style-name="T4">years</text:span><text:span text:style-name="T3"> reigned he in Jerusalem.</text:span></text:p>
      <text:p text:style-name="P1" loext:marker-style-name="T1"><text:span text:style-name="T2">2Chr 9:30 </text:span><text:span text:style-name="T3">And Solomon reigned in Jerusalem over all Israel forty years.</text:span></text:p>
      <text:p text:style-name="P1" loext:marker-style-name="T1"><text:span text:style-name="T2">2Chr 12:13 </text:span><text:span text:style-name="T3">So king Rehoboam strengthened himself in Jerusalem, and reigned: for Rehoboam </text:span><text:span text:style-name="T4">was</text:span><text:span text:style-name="T3"> one and forty years old when he began to reign, and he reigned seventeen years in Jerusalem, the city which the LORD had chosen out of all the tribes of Israel, to put his name there. And his mother's name </text:span><text:span text:style-name="T4">was</text:span><text:span text:style-name="T3"> Naamah an Ammonitess.</text:span></text:p>
      <text:p text:style-name="P1" loext:marker-style-name="T1"><text:soft-page-break/><text:span text:style-name="T2">2Chr 22:2 </text:span><text:span text:style-name="T3">Forty and two years old </text:span><text:span text:style-name="T4">was</text:span><text:span text:style-name="T3"> Ahaziah when he began to reign, and he reigned one year in Jerusalem. His mother's name also </text:span><text:span text:style-name="T4">was</text:span><text:span text:style-name="T3"> Athaliah the daughter of Omri.</text:span></text:p>
      <text:p text:style-name="P1" loext:marker-style-name="T1"><text:span text:style-name="T2">2Chr 24:1 </text:span><text:span text:style-name="T3">Joash </text:span><text:span text:style-name="T4">was</text:span><text:span text:style-name="T3"> seven years old when he began to reign, and he reigned forty years in Jerusalem. His mother's name also </text:span><text:span text:style-name="T4">was</text:span><text:span text:style-name="T3"> Zibiah of Beersheba.</text:span></text:p>
      <text:p text:style-name="P1" loext:marker-style-name="T1"><text:span text:style-name="T2">Ezra 2:8 </text:span><text:span text:style-name="T3">The children of Zattu, nine hundred forty and five.</text:span></text:p>
      <text:p text:style-name="P1" loext:marker-style-name="T1"><text:span text:style-name="T2">Ezra 2:10 </text:span><text:span text:style-name="T3">The children of Bani, six hundred forty and two.</text:span></text:p>
      <text:p text:style-name="P1" loext:marker-style-name="T1"><text:span text:style-name="T2">Ezra 2:24 </text:span><text:span text:style-name="T3">The children of Azmaveth, forty and two.</text:span></text:p>
      <text:p text:style-name="P1" loext:marker-style-name="T1"><text:span text:style-name="T2">Ezra 2:25 </text:span><text:span text:style-name="T3">The children of Kirjatharim, Chephirah, and Beeroth, seven hundred and forty and three.</text:span></text:p>
      <text:p text:style-name="P1" loext:marker-style-name="T1"><text:span text:style-name="T2">Ezra 2:34 </text:span><text:span text:style-name="T3">The children of Jericho, three hundred forty and five.</text:span></text:p>
      <text:p text:style-name="P1" loext:marker-style-name="T1"><text:span text:style-name="T2">Ezra 2:38 </text:span><text:span text:style-name="T3">The children of Pashur, a thousand two hundred forty and seven.</text:span></text:p>
      <text:p text:style-name="P1" loext:marker-style-name="T1"><text:span text:style-name="T2">Ezra 2:64 </text:span><text:span text:style-name="T3">The whole congregation together </text:span><text:span text:style-name="T4">was</text:span><text:span text:style-name="T3"> forty and two thousand three hundred </text:span><text:span text:style-name="T4">and</text:span><text:span text:style-name="T3"> threescore,</text:span></text:p>
      <text:p text:style-name="P1" loext:marker-style-name="T1"><text:span text:style-name="T2">Ezra 2:66 </text:span><text:span text:style-name="T3">Their horses </text:span><text:span text:style-name="T4">were</text:span><text:span text:style-name="T3"> seven hundred thirty and six; their mules, two hundred forty and five;</text:span></text:p>
      <text:p text:style-name="P1" loext:marker-style-name="T1"><text:span text:style-name="T2">Neh 5:15 </text:span><text:span text:style-name="T3">But the former governors that </text:span><text:span text:style-name="T4">had been</text:span><text:span text:style-name="T3"> before me were chargeable unto the people, and had taken of them bread and wine, beside forty shekels of silver; yea, even their servants bare rule over the people: but so did not I, because of the fear of God.</text:span></text:p>
      <text:p text:style-name="P1" loext:marker-style-name="T1"><text:span text:style-name="T2">Neh 7:13 </text:span><text:span text:style-name="T3">The children of Zattu, eight hundred forty and five.</text:span></text:p>
      <text:p text:style-name="P1" loext:marker-style-name="T1"><text:span text:style-name="T2">Neh 7:15 </text:span><text:span text:style-name="T3">The children of Binnui, six hundred forty and eight.</text:span></text:p>
      <text:p text:style-name="P1" loext:marker-style-name="T1"><text:span text:style-name="T2">Neh 7:28 </text:span><text:span text:style-name="T3">The men of Bethazmaveth, forty and two.</text:span></text:p>
      <text:p text:style-name="P1" loext:marker-style-name="T1"><text:span text:style-name="T2">Neh 7:29 </text:span><text:span text:style-name="T3">The men of Kirjathjearim, Chephirah, and Beeroth, seven hundred forty and three.</text:span></text:p>
      <text:p text:style-name="P1" loext:marker-style-name="T1"><text:span text:style-name="T2">Neh 7:36 </text:span><text:span text:style-name="T3">The children of Jericho, three hundred forty and five.</text:span></text:p>
      <text:p text:style-name="P1" loext:marker-style-name="T1"><text:span text:style-name="T2">Neh 7:41 </text:span><text:span text:style-name="T3">The children of Pashur, a thousand two hundred forty and seven.</text:span></text:p>
      <text:p text:style-name="P1" loext:marker-style-name="T1"><text:span text:style-name="T2">Neh 7:44 </text:span><text:span text:style-name="T3">The singers: the children of Asaph, an hundred forty and eight.</text:span></text:p>
      <text:p text:style-name="P1" loext:marker-style-name="T1"><text:span text:style-name="T2">Neh 7:62 </text:span><text:span text:style-name="T3">The children of Delaiah, the children of Tobiah, the children of Nekoda, six hundred forty and two.</text:span></text:p>
      <text:p text:style-name="P1" loext:marker-style-name="T1"><text:span text:style-name="T2">Neh 7:66 </text:span><text:span text:style-name="T3">The whole congregation together </text:span><text:span text:style-name="T4">was</text:span><text:span text:style-name="T3"> forty and two thousand three hundred and threescore,</text:span></text:p>
      <text:p text:style-name="P1" loext:marker-style-name="T1"><text:span text:style-name="T2">Neh 7:67 </text:span><text:span text:style-name="T3">Beside their manservants and their maidservants, of whom </text:span><text:span text:style-name="T4">there were</text:span><text:span text:style-name="T3"> seven thousand three hundred thirty and seven: and they had two hundred forty and five singing men and singing women.</text:span></text:p>
      <text:p text:style-name="P1" loext:marker-style-name="T1"><text:span text:style-name="T2">Neh 7:68 </text:span><text:span text:style-name="T3">Their horses, seven hundred thirty and six: their mules, two hundred forty and five:</text:span></text:p>
      <text:p text:style-name="P1" loext:marker-style-name="T1"><text:span text:style-name="T2">Neh 9:21 </text:span><text:span text:style-name="T3">Yea, forty years didst thou sustain them in the wilderness, </text:span><text:span text:style-name="T4">so that</text:span><text:span text:style-name="T3"> they lacked nothing; their clothes waxed not old, and their feet swelled not.</text:span></text:p>
      <text:p text:style-name="P1" loext:marker-style-name="T1"><text:span text:style-name="T2">Neh 11:13 </text:span><text:span text:style-name="T3">And his brethren, chief of the fathers, two hundred forty and two: and Amashai the son of Azareel, the son of Ahasai, the son of Meshillemoth, the son of Immer,</text:span></text:p>
      <text:p text:style-name="P1" loext:marker-style-name="T1"><text:span text:style-name="T2">Job 42:16 </text:span><text:span text:style-name="T3">After this lived Job an hundred and forty years, and saw his sons, and his sons' sons, </text:span><text:span text:style-name="T4">even</text:span><text:span text:style-name="T3"> four generations.</text:span></text:p>
      <text:p text:style-name="P1" loext:marker-style-name="T1"><text:span text:style-name="T2">Ps 95:10 </text:span><text:span text:style-name="T3">Forty years long was I grieved with </text:span><text:span text:style-name="T4">this</text:span><text:span text:style-name="T3"> generation, and said, It </text:span><text:span text:style-name="T4">is</text:span><text:span text:style-name="T3"> a people that do err in their heart, and they have not known my ways:</text:span></text:p>
      <text:p text:style-name="P1" loext:marker-style-name="T1"><text:span text:style-name="T2">Jer 52:30 </text:span><text:span text:style-name="T3">In the three and twentieth year of Nebuchadrezzar Nebuzaradan the captain of the guard carried away captive of the Jews seven hundred forty and five persons: all the persons </text:span><text:span text:style-name="T4">were</text:span><text:span text:style-name="T3"> four thousand and six hundred.</text:span></text:p>
      <text:p text:style-name="P1" loext:marker-style-name="T1"><text:span text:style-name="T2">Ezek 4:6 </text:span><text:span text:style-name="T3">And when thou hast accomplished them, lie again on thy right side, and thou shalt bear the iniquity of the house of Judah forty days: I have appointed thee each day for a year.</text:span></text:p>
      <text:p text:style-name="P1" loext:marker-style-name="T1"><text:soft-page-break/><text:span text:style-name="T2">Ezek 29:11 </text:span><text:span text:style-name="T3">No foot of man shall pass through it, nor foot of beast shall pass through it, neither shall it be inhabited forty years.</text:span></text:p>
      <text:p text:style-name="P1" loext:marker-style-name="T1"><text:span text:style-name="T2">Ezek 29:12 </text:span><text:span text:style-name="T3">And I will make the land of Egypt desolate in the midst of the countries </text:span><text:span text:style-name="T4">that are</text:span><text:span text:style-name="T3"> desolate, and her cities among the cities </text:span><text:span text:style-name="T4">that are</text:span><text:span text:style-name="T3"> laid waste shall be desolate forty years: and I will scatter the Egyptians among the nations, and will disperse them through the countries.</text:span></text:p>
      <text:p text:style-name="P1" loext:marker-style-name="T1"><text:span text:style-name="T2">Ezek 29:13 </text:span><text:span text:style-name="T3">Yet thus saith the Lord GOD; At the end of forty years will I gather the Egyptians from the people whither they were scattered:</text:span></text:p>
      <text:p text:style-name="P1" loext:marker-style-name="T1"><text:span text:style-name="T2">Ezek 41:2 </text:span><text:span text:style-name="T3">And the breadth of the door </text:span><text:span text:style-name="T4">was</text:span><text:span text:style-name="T3"> ten cubits; and the sides of the door </text:span><text:span text:style-name="T4">were</text:span><text:span text:style-name="T3"> five cubits on the one side, and five cubits on the other side: and he measured the length thereof, forty cubits: and the breadth, twenty cubits.</text:span></text:p>
      <text:p text:style-name="P1" loext:marker-style-name="T1"><text:span text:style-name="T2">Ezek 46:22 </text:span><text:span text:style-name="T3">In the four corners of the court </text:span><text:span text:style-name="T4">there were</text:span><text:span text:style-name="T3"> courts joined of forty </text:span><text:span text:style-name="T4">cubits</text:span><text:span text:style-name="T3"> long and thirty broad: these four corners </text:span><text:span text:style-name="T4">were</text:span><text:span text:style-name="T3"> of one measure.</text:span></text:p>
      <text:p text:style-name="P1" loext:marker-style-name="T1"><text:span text:style-name="T2">Amos 2:10 </text:span><text:span text:style-name="T3">Also I brought you up from the land of Egypt, and led you forty years through the wilderness, to possess the land of the Amorite.</text:span></text:p>
      <text:p text:style-name="P1" loext:marker-style-name="T1"><text:span text:style-name="T2">Amos 5:25 </text:span><text:span text:style-name="T3">Have ye offered unto me sacrifices and offerings in the wilderness forty years, O house of Israel?</text:span></text:p>
      <text:p text:style-name="P1" loext:marker-style-name="T1"><text:span text:style-name="T2">Jonah 3:4 </text:span><text:span text:style-name="T3">And Jonah began to enter into the city a day's journey, and he cried, and said, Yet forty days, and Nineveh shall be overthrown.</text:span></text:p>
      <text:p text:style-name="P1" loext:marker-style-name="T1"><text:span text:style-name="T2">Matt 4:2 </text:span><text:span text:style-name="T3">And when he had fasted forty days and forty nights, he was afterward an hungred.</text:span></text:p>
      <text:p text:style-name="P1" loext:marker-style-name="T1"><text:span text:style-name="T2">Mark 1:13 </text:span><text:span text:style-name="T3">And he was there in the wilderness forty days, tempted of Satan; and was with the wild beasts; and the angels ministered unto him.</text:span></text:p>
      <text:p text:style-name="P1" loext:marker-style-name="T1"><text:span text:style-name="T2">Luke 4:2 </text:span><text:span text:style-name="T3">Being forty days tempted of the devil. And in those days he did eat nothing: and when they were ended, he afterward hungered.</text:span></text:p>
      <text:p text:style-name="P1" loext:marker-style-name="T1"><text:span text:style-name="T2">John 2:20 </text:span><text:span text:style-name="T3">Then said the Jews, Forty and six years was this temple in building, and wilt thou rear it up in three days?</text:span></text:p>
      <text:p text:style-name="P1" loext:marker-style-name="T1"><text:span text:style-name="T2">Acts 1:3 </text:span><text:span text:style-name="T3">To whom also he shewed himself alive after his passion by many infallible proofs, being seen of them forty days, and speaking of the things pertaining to the kingdom of God:</text:span></text:p>
      <text:p text:style-name="P1" loext:marker-style-name="T1"><text:span text:style-name="T2">Acts 4:22 </text:span><text:span text:style-name="T3">For the man was above forty years old, on whom this miracle of healing was shewed.</text:span></text:p>
      <text:p text:style-name="P1" loext:marker-style-name="T1"><text:span text:style-name="T2">Acts 7:23 </text:span><text:span text:style-name="T3">And when he was full forty years old, it came into his heart to visit his brethren the children of Israel.</text:span></text:p>
      <text:p text:style-name="P1" loext:marker-style-name="T1"><text:span text:style-name="T2">Acts 7:30 </text:span><text:span text:style-name="T3">And when forty years were expired, there appeared to him in the wilderness of mount Sina an angel of the Lord in a flame of fire in a bush.</text:span></text:p>
      <text:p text:style-name="P1" loext:marker-style-name="T1"><text:span text:style-name="T2">Acts 7:36 </text:span><text:span text:style-name="T3">He brought them out, after that he had shewed wonders and signs in the land of Egypt, and in the Red sea, and in the wilderness forty years.</text:span></text:p>
      <text:p text:style-name="P1" loext:marker-style-name="T1"><text:span text:style-name="T2">Acts 7:42 </text:span><text:span text:style-name="T3">Then God turned, and gave them up to worship the host of heaven; as it is written in the book of the prophets, </text:span><text:span text:style-name="T5">O ye house of Israel, have ye offered to me slain beasts and sacrifices </text:span><text:span text:style-name="T6">by the space of</text:span><text:span text:style-name="T5"> forty years in the wilderness?</text:span></text:p>
      <text:p text:style-name="P1" loext:marker-style-name="T1"><text:span text:style-name="T2">Acts 13:18 </text:span><text:span text:style-name="T3">And about the time of forty years suffered he their manners in the wilderness.</text:span></text:p>
      <text:p text:style-name="P1" loext:marker-style-name="T1"><text:span text:style-name="T2">Acts 13:21 </text:span><text:span text:style-name="T3">And afterward they desired a king: and God gave unto them Saul the son of Cis, a man of the tribe of Benjamin, by the space of forty years.</text:span></text:p>
      <text:p text:style-name="P1" loext:marker-style-name="T1"><text:span text:style-name="T2">Acts 23:13 </text:span><text:span text:style-name="T3">And they were more than forty which had made this conspiracy.</text:span></text:p>
      <text:p text:style-name="P1" loext:marker-style-name="T1"><text:span text:style-name="T2">Acts 23:21 </text:span><text:span text:style-name="T3">But do not thou yield unto them: for there lie in wait for him of them more than forty men, which have bound themselves with an oath, that they will neither eat nor drink till they have killed him: and now are they ready, looking for a promise from thee.</text:span></text:p>
      <text:p text:style-name="P1" loext:marker-style-name="T1"><text:span text:style-name="T2">2Cor 11:24 </text:span><text:span text:style-name="T3">Of the Jews five times received I forty </text:span><text:span text:style-name="T4">stripes</text:span><text:span text:style-name="T3"> save one.</text:span></text:p>
      <text:p text:style-name="P1" loext:marker-style-name="T1"><text:span text:style-name="T2">Heb 3:9 </text:span><text:span text:style-name="T5">When your fathers tempted me, proved me, and saw my works forty years.</text:span></text:p>
      <text:p text:style-name="P1" loext:marker-style-name="T1"><text:soft-page-break/><text:span text:style-name="T2">Heb 3:17 </text:span><text:span text:style-name="T3">But with whom was he grieved forty years? </text:span><text:span text:style-name="T4">was it</text:span><text:span text:style-name="T3"> not with them that had sinned, whose carcases fell in the wilderness?</text:span></text:p>
      <text:p text:style-name="P1" loext:marker-style-name="T1"><text:span text:style-name="T2">Rev 7:4 </text:span><text:span text:style-name="T3">And I heard the number of them which were sealed: </text:span><text:span text:style-name="T4">and there were</text:span><text:span text:style-name="T3"> sealed an hundred </text:span><text:span text:style-name="T4">and</text:span><text:span text:style-name="T3"> forty </text:span><text:span text:style-name="T4">and</text:span><text:span text:style-name="T3"> four thousand of all the tribes of the children of Israel.</text:span></text:p>
      <text:p text:style-name="P1" loext:marker-style-name="T1"><text:span text:style-name="T2">Rev 11:2 </text:span><text:span text:style-name="T3">But the court which is without the temple leave out, and measure it not; for it is given unto the Gentiles: and the holy city shall they tread under foot forty </text:span><text:span text:style-name="T4">and</text:span><text:span text:style-name="T3"> two months.</text:span></text:p>
      <text:p text:style-name="P1" loext:marker-style-name="T1"><text:span text:style-name="T2">Rev 13:5 </text:span><text:span text:style-name="T3">And there was given unto him a mouth speaking great things and blasphemies; and power was given unto him to continue forty </text:span><text:span text:style-name="T4">and</text:span><text:span text:style-name="T3"> two months.</text:span></text:p>
      <text:p text:style-name="P1" loext:marker-style-name="T1"><text:span text:style-name="T2">Rev 14:1 </text:span><text:span text:style-name="T3">And I looked, and, lo, a Lamb stood on the mount Sion, and with him an hundred forty </text:span><text:span text:style-name="T4">and</text:span><text:span text:style-name="T3"> four thousand, having his Father's name written in their foreheads.</text:span></text:p>
      <text:p text:style-name="P1" loext:marker-style-name="T1"><text:span text:style-name="T2">Rev 14:3 </text:span><text:span text:style-name="T3">And they sung as it were a new song before the throne, and before the four beasts, and the elders: and no man could learn that song but the hundred </text:span><text:span text:style-name="T4">and</text:span><text:span text:style-name="T3"> forty </text:span><text:span text:style-name="T4">and</text:span><text:span text:style-name="T3"> four thousand, which were redeemed from the earth.</text:span></text:p>
      <text:p text:style-name="P1" loext:marker-style-name="T1"><text:span text:style-name="T2">Rev 21:17 </text:span><text:span text:style-name="T3">And he measured the wall thereof, an hundred </text:span><text:span text:style-name="T4">and</text:span><text:span text:style-name="T3"> forty </text:span><text:span text:style-name="T4">and</text:span><text:span text:style-name="T3"> four cubits, </text:span><text:span text:style-name="T4">according to</text:span><text:span text:style-name="T3"> the measure of a man, that is, of the ange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William K. McDannell</meta:initial-creator>
    <meta:creation-date>2024-06-05T08:55:59.884000000</meta:creation-date>
    <dc:date>2026-07-11T12:30:48.438747682</dc:date>
    <meta:editing-duration>PT11M34S</meta:editing-duration>
    <meta:editing-cycles>9</meta:editing-cycles>
    <meta:generator>LibreOffice/26.2.4.2$Linux_X86_64 LibreOffice_project/64a984c51f4702dbd3710b13428c673a2f1292e7</meta:generator>
    <meta:document-statistic meta:table-count="0" meta:image-count="0" meta:object-count="0" meta:page-count="7" meta:paragraph-count="145" meta:word-count="3997" meta:character-count="21203" meta:non-whitespace-character-count="17351"/>
  </office:meta>
</office:document-meta>
</file>