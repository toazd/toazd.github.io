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3.9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3fe83" officeooo:paragraph-rsid="0013fe8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3fe83" officeooo:paragraph-rsid="0013fe83"/>
    </style:style>
    <style:style style:name="P3" style:family="paragraph" style:parent-style-name="Table_20_Contents" style:list-style-name="L1">
      <style:text-properties officeooo:rsid="00153213" officeooo:paragraph-rsid="00153213"/>
    </style:style>
    <style:style style:name="P4" style:family="paragraph" style:parent-style-name="Table_20_Contents" style:list-style-name="L1">
      <style:text-properties officeooo:rsid="00165802" officeooo:paragraph-rsid="00165802"/>
    </style:style>
    <style:style style:name="P5" style:family="paragraph" style:parent-style-name="Table_20_Contents">
      <style:paragraph-properties fo:text-align="center" style:justify-single-word="false"/>
      <style:text-properties officeooo:rsid="0018b97c" officeooo:paragraph-rsid="0018b97c"/>
    </style:style>
    <style:style style:name="P6" style:family="paragraph" style:parent-style-name="Table_20_Contents" style:list-style-name="L2">
      <style:text-properties officeooo:rsid="0018b97c" officeooo:paragraph-rsid="0018b97c"/>
    </style:style>
    <style:style style:name="P7" style:family="paragraph" style:parent-style-name="Table_20_Contents" style:list-style-name="L3">
      <style:text-properties officeooo:rsid="0019c69a" officeooo:paragraph-rsid="001c3f3a"/>
    </style:style>
    <style:style style:name="P8" style:family="paragraph" style:parent-style-name="Table_20_Contents" style:list-style-name="L3">
      <style:text-properties officeooo:rsid="001a9142" officeooo:paragraph-rsid="001c3f3a"/>
    </style:style>
    <style:style style:name="P9" style:family="paragraph" style:parent-style-name="Table_20_Contents">
      <style:paragraph-properties fo:text-align="center" style:justify-single-word="false"/>
      <style:text-properties officeooo:rsid="0019c69a" officeooo:paragraph-rsid="0019c69a"/>
    </style:style>
    <style:style style:name="P10" style:family="paragraph" style:parent-style-name="Table_20_Contents" style:list-style-name="L4">
      <style:text-properties officeooo:rsid="0019c69a" officeooo:paragraph-rsid="0019c69a"/>
    </style:style>
    <style:style style:name="P11" style:family="paragraph" style:parent-style-name="Table_20_Contents" style:list-style-name="L4">
      <style:text-properties officeooo:rsid="001a9142" officeooo:paragraph-rsid="001a9142"/>
    </style:style>
    <style:style style:name="P12" style:family="paragraph" style:parent-style-name="Table_20_Contents">
      <style:paragraph-properties fo:text-align="center" style:justify-single-word="false"/>
      <style:text-properties officeooo:rsid="001c36b3" officeooo:paragraph-rsid="001c36b3"/>
    </style:style>
    <style:style style:name="P13" style:family="paragraph" style:parent-style-name="Table_20_Contents" style:list-style-name="L4">
      <style:text-properties officeooo:rsid="0019c69a" officeooo:paragraph-rsid="001c3f3a"/>
    </style:style>
    <style:style style:name="P14" style:family="paragraph" style:parent-style-name="Table_20_Contents" style:list-style-name="L4">
      <style:text-properties officeooo:rsid="001a9142" officeooo:paragraph-rsid="001c3f3a"/>
    </style:style>
    <style:style style:name="P15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af75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ext:p text:style-name="Table_20_Contents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Location</text:p>
          </table:table-cell>
          <table:table-cell table:style-name="Table1.B1" office:value-type="string">
            <text:p text:style-name="P1">People</text:p>
          </table:table-cell>
        </table:table-row>
        <table:table-row>
          <table:table-cell table:style-name="Table1.A2" office:value-type="string">
            <text:p text:style-name="P2">Antioch (Syria)</text:p>
          </table:table-cell>
          <table:table-cell table:style-name="Table1.B2" office:value-type="string">
            <text:list text:style-name="L1">
              <text:list-item>
                <text:p text:style-name="P3">Barnabas</text:p>
              </text:list-item>
              <text:list-item>
                <text:p text:style-name="P3">Simeon (Niger)</text:p>
              </text:list-item>
              <text:list-item>
                <text:p text:style-name="P3">Lucius of Cyrene</text:p>
              </text:list-item>
              <text:list-item>
                <text:p text:style-name="P4">Manaen</text:p>
              </text:list-item>
              <text:list-item>
                <text:p text:style-name="P4">Saul</text:p>
              </text:list-item>
            </text:list>
          </table:table-cell>
        </table:table-row>
        <table:table-row>
          <table:table-cell table:style-name="Table1.A2" office:value-type="string">
            <text:p text:style-name="P5">Seleucia</text:p>
          </table:table-cell>
          <table:table-cell table:style-name="Table1.B2" office:value-type="string">
            <text:list text:style-name="L2">
              <text:list-item>
                <text:p text:style-name="P6">Barnabas</text:p>
              </text:list-item>
              <text:list-item>
                <text:p text:style-name="P6">Saul</text:p>
              </text:list-item>
            </text:list>
          </table:table-cell>
        </table:table-row>
        <table:table-row>
          <table:table-cell table:style-name="Table1.A2" office:value-type="string">
            <text:p text:style-name="P5">Cyprus</text:p>
          </table:table-cell>
          <table:table-cell table:style-name="Table1.B2" office:value-type="string">
            <text:list text:style-name="L3">
              <text:list-item>
                <text:p text:style-name="P7">Barnabas</text:p>
              </text:list-item>
              <text:list-item>
                <text:p text:style-name="P7">Saul</text:p>
              </text:list-item>
              <text:list-item>
                <text:p text:style-name="P8">John <text:span text:style-name="T1">Mark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9">Salamas (Cyprus)</text:p>
          </table:table-cell>
          <table:table-cell table:style-name="Table1.B2" office:value-type="string">
            <text:list text:style-name="L4">
              <text:list-item>
                <text:p text:style-name="P10">Barnabas</text:p>
              </text:list-item>
              <text:list-item>
                <text:p text:style-name="P10">Saul</text:p>
              </text:list-item>
              <text:list-item>
                <text:p text:style-name="P11">John <text:span text:style-name="T1">Mark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2">Paphos (Cyprus)</text:p>
          </table:table-cell>
          <table:table-cell table:style-name="Table1.B2" office:value-type="string">
            <text:list text:continue-numbering="true" text:style-name="L4">
              <text:list-item>
                <text:p text:style-name="P13">Barnabas</text:p>
              </text:list-item>
              <text:list-item>
                <text:p text:style-name="P13">Saul</text:p>
              </text:list-item>
              <text:list-item>
                <text:p text:style-name="P14">John <text:span text:style-name="T1">Mark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1T08:29:57.436087700</meta:creation-date>
    <dc:title>default</dc:title>
    <meta:editing-duration>PT1H11M30S</meta:editing-duration>
    <meta:editing-cycles>11</meta:editing-cycles>
    <meta:generator>LibreOffice/25.8.1.1$Windows_X86_64 LibreOffice_project/54047653041915e595ad4e45cccea684809c77b5</meta:generator>
    <meta:initial-creator>William K. McDannell Jr.</meta:initial-creator>
    <dc:date>2025-10-11T09:41:29.658015800</dc:date>
    <dc:creator>William K. McDannell Jr.</dc:creator>
    <meta:document-statistic meta:table-count="1" meta:image-count="0" meta:object-count="0" meta:page-count="1" meta:paragraph-count="23" meta:word-count="48" meta:character-count="213" meta:non-whitespace-character-count="204"/>
    <meta:template xlink:type="simple" xlink:actuate="onRequest" xlink:title="default" xlink:href="../../../../AppData/Roaming/LibreOffice/4/user/template/default.ott" meta:date="2025-10-11T08:29:56.515503400"/>
  </office:meta>
</office:document-meta>
</file>