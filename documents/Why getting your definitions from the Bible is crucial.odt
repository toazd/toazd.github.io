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Gabriela_Nerd_Font_1.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ucida_Sans_1.ttf" manifest:media-type="application/x-font-ttf"/>
  <manifest:file-entry manifest:full-path="Fonts/Font_Lucida_San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writing-mode="lr-tb"/>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1.A2" style:family="table-cell">
      <style:table-cell-properties fo:padding="0.0382in" fo:border-left="0.75pt solid #000000" fo:border-right="0.75pt solid #000000" fo:border-top="none" fo:border-bottom="0.75pt solid #000000"/>
    </style:style>
    <style:style style:name="Table2" style:family="table">
      <style:table-properties style:width="7.9in" table:align="margins" style:may-break-between-rows="true" style:writing-mode="lr-tb" table:border-model="collapsing"/>
    </style:style>
    <style:style style:name="Table2.A" style:family="table-column">
      <style:table-column-properties style:column-width="7.9in" style:rel-column-width="65535*"/>
    </style:style>
    <style:style style:name="Table2.1" style:family="table-row">
      <style:table-row-properties fo:keep-together="auto"/>
    </style:style>
    <style:style style:name="Table2.A1" style:family="table-cell">
      <style:table-cell-properties fo:background-color="transparent" fo:padding="0.0382in" fo:border="0.75pt solid #000000" style:writing-mode="page">
        <style:background-image/>
      </style:table-cell-properties>
    </style:style>
    <style:style style:name="Table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writing-mode="lr-tb"/>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writing-mode="lr-tb"/>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writing-mode="lr-tb"/>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writing-mode="lr-tb"/>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writing-mode="lr-tb"/>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writing-mode="lr-tb"/>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writing-mode="lr-tb"/>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writing-mode="lr-tb"/>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may-break-between-rows="true" style:writing-mode="lr-tb" table:border-model="collapsing"/>
    </style:style>
    <style:style style:name="Table12.A" style:family="table-column">
      <style:table-column-properties style:column-width="7.9in" style:rel-column-width="65535*"/>
    </style:style>
    <style:style style:name="Table12.1" style:family="table-row">
      <style:table-row-properties fo:keep-together="auto"/>
    </style:style>
    <style:style style:name="Table12.A1" style:family="table-cell">
      <style:table-cell-properties fo:background-color="transparent" fo:padding="0.0382in" fo:border="0.75pt solid #000000" style:writing-mode="page">
        <style:background-image/>
      </style:table-cell-properties>
    </style:style>
    <style:style style:name="Table1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3" style:family="table">
      <style:table-properties style:width="7.9in" table:align="margins" style:writing-mode="lr-tb"/>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writing-mode="lr-tb"/>
    </style:style>
    <style:style style:name="Table14.A" style:family="table-column">
      <style:table-column-properties style:column-width="7.9in" style:rel-column-width="11376*"/>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writing-mode="lr-tb"/>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may-break-between-rows="true" style:writing-mode="lr-tb" table:border-model="collapsing"/>
    </style:style>
    <style:style style:name="Table16.A" style:family="table-column">
      <style:table-column-properties style:column-width="7.9in" style:rel-column-width="65535*"/>
    </style:style>
    <style:style style:name="Table16.A1" style:family="table-cell">
      <style:table-cell-properties fo:background-color="transparent" fo:padding="0.0382in" fo:border="0.7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7" style:family="table">
      <style:table-properties style:width="7.9in" table:align="margins" style:writing-mode="lr-tb"/>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may-break-between-rows="true" style:writing-mode="lr-tb" table:border-model="collapsing"/>
    </style:style>
    <style:style style:name="Table18.A" style:family="table-column">
      <style:table-column-properties style:column-width="3.95in" style:rel-column-width="32768*"/>
    </style:style>
    <style:style style:name="Table18.B" style:family="table-column">
      <style:table-column-properties style:column-width="3.95in" style:rel-column-width="32767*"/>
    </style:style>
    <style:style style:name="Table18.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18.B1" style:family="table-cell">
      <style:table-cell-properties fo:background-color="transparent" fo:padding="0.0382in" fo:border="0.75pt solid #000000" style:writing-mode="page">
        <style:background-image/>
      </style:table-cell-properties>
    </style:style>
    <style:style style:name="Table18.2" style:family="table-row">
      <style:table-row-properties fo:keep-together="auto"/>
    </style:style>
    <style:style style:name="Table18.A2"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18.B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9" style:family="table">
      <style:table-properties style:width="7.9in" table:align="margins" style:writing-mode="lr-tb"/>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may-break-between-rows="true" style:writing-mode="lr-tb" table:border-model="collapsing"/>
    </style:style>
    <style:style style:name="Table20.A" style:family="table-column">
      <style:table-column-properties style:column-width="7.9in" style:rel-column-width="65535*"/>
    </style:style>
    <style:style style:name="Table20.A1" style:family="table-cell">
      <style:table-cell-properties fo:background-color="transparent" fo:padding="0.0382in" fo:border="0.75pt solid #000000" style:writing-mode="page">
        <style:background-image/>
      </style:table-cell-properties>
    </style:style>
    <style:style style:name="Table20.2" style:family="table-row">
      <style:table-row-properties fo:keep-together="auto"/>
    </style:style>
    <style:style style:name="Table20.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21" style:family="table">
      <style:table-properties style:width="7.9in" table:align="margins" style:writing-mode="lr-tb"/>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2" style:family="table">
      <style:table-properties style:width="7.9in" table:align="margins" style:writing-mode="lr-tb"/>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writing-mode="lr-tb"/>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writing-mode="lr-tb"/>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Table25" style:family="table">
      <style:table-properties style:width="7.9in" table:align="margins" style:writing-mode="lr-tb"/>
    </style:style>
    <style:style style:name="Table25.A" style:family="table-column">
      <style:table-column-properties style:column-width="7.9in" style:rel-column-width="65535*"/>
    </style:style>
    <style:style style:name="Table25.A1" style:family="table-cell">
      <style:table-cell-properties fo:padding="0.0382in" fo:border="0.5pt solid #000000"/>
    </style:style>
    <style:style style:name="P1" style:family="paragraph" style:parent-style-name="Standard">
      <style:paragraph-properties fo:text-align="center" style:justify-single-word="false" style:writing-mode="lr-tb"/>
      <style:text-properties style:font-name="Gabriela Nerd Font" fo:font-size="14pt" style:text-underline-style="none" fo:font-weight="bold" officeooo:paragraph-rsid="001174ba" style:font-size-asian="14pt" style:font-weight-asian="bold" style:font-size-complex="14pt" style:font-weight-complex="bold"/>
    </style:style>
    <style:style style:name="P2" style:family="paragraph" style:parent-style-name="Standard">
      <style:paragraph-properties fo:text-align="center" style:justify-single-word="false" style:writing-mode="lr-tb"/>
      <style:text-properties style:font-name="Liberation Sans" officeooo:paragraph-rsid="001174ba"/>
    </style:style>
    <style:style style:name="P3" style:family="paragraph" style:parent-style-name="Standard">
      <style:paragraph-properties fo:text-align="start" style:justify-single-word="false" style:writing-mode="lr-tb"/>
      <style:text-properties style:font-name="Liberation Sans" fo:font-size="12pt" officeooo:paragraph-rsid="001174ba" style:font-size-asian="12pt" style:font-size-complex="12pt"/>
    </style:style>
    <style:style style:name="P4" style:family="paragraph" style:parent-style-name="Standard">
      <style:paragraph-properties fo:text-align="start" style:justify-single-word="false" style:writing-mode="lr-tb"/>
      <style:text-properties style:font-name="Liberation Sans" officeooo:paragraph-rsid="001174ba"/>
    </style:style>
    <style:style style:name="P5" style:family="paragraph" style:parent-style-name="Standard">
      <style:paragraph-properties fo:text-align="start" style:justify-single-word="false" style:writing-mode="lr-tb"/>
      <style:text-properties style:font-name="Liberation Sans" fo:font-size="12pt" officeooo:rsid="001174ba" officeooo:paragraph-rsid="001174ba" style:font-size-asian="12pt" style:font-size-complex="12pt"/>
    </style:style>
    <style:style style:name="P6" style:family="paragraph" style:parent-style-name="Standard">
      <style:paragraph-properties fo:text-align="start" style:justify-single-word="false" style:writing-mode="lr-tb"/>
      <style:text-properties style:font-name="Liberation Sans" fo:font-size="12pt" fo:font-weight="normal" officeooo:rsid="001174ba" officeooo:paragraph-rsid="001174ba" style:font-size-asian="12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Liberation Sans" fo:font-size="12pt" officeooo:paragraph-rsid="001174ba" style:font-size-asian="12pt" style:font-size-complex="12pt"/>
    </style:style>
    <style:style style:name="P8" style:family="paragraph" style:parent-style-name="Standard">
      <style:paragraph-properties fo:text-align="start" style:justify-single-word="false" style:writing-mode="lr-tb"/>
      <style:text-properties style:font-name="Liberation Sans" fo:font-size="12pt" fo:font-weight="normal" officeooo:rsid="00129532" officeooo:paragraph-rsid="001174ba"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text-properties style:font-name="Liberation Sans" fo:font-size="12pt" fo:font-weight="normal" officeooo:rsid="00129532" officeooo:paragraph-rsid="00129532" style:font-size-asian="12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style:font-name="Liberation Sans" fo:font-size="12pt" fo:font-weight="normal" officeooo:rsid="002814b4" officeooo:paragraph-rsid="002814b4" style:font-size-asian="12pt" style:font-weight-asian="normal" style:font-size-complex="12pt" style:font-weight-complex="normal"/>
    </style:style>
    <style:style style:name="P11" style:family="paragraph" style:parent-style-name="Standard">
      <style:paragraph-properties fo:text-align="center" style:justify-single-word="false" style:writing-mode="lr-tb"/>
      <style:text-properties style:font-name="Gabriela Nerd Font" fo:font-size="14pt" fo:font-weight="normal" officeooo:rsid="00d5c5f5" officeooo:paragraph-rsid="00d5c5f5" style:font-size-asian="12.25pt" style:font-weight-asian="normal" style:font-size-complex="14pt" style:font-weight-complex="normal"/>
    </style:style>
    <style:style style:name="P12" style:family="paragraph" style:parent-style-name="Standard">
      <style:paragraph-properties fo:text-align="start" style:justify-single-word="false" style:writing-mode="lr-tb"/>
      <style:text-properties style:font-name="Liberation Sans" fo:font-size="12pt" fo:font-weight="normal" officeooo:rsid="001701b0" officeooo:paragraph-rsid="001701b0"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2d6" officeooo:paragraph-rsid="001892d6"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2d6" officeooo:paragraph-rsid="001892d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9360" officeooo:paragraph-rsid="001c936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cfcf6" officeooo:paragraph-rsid="001cfcf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fcf6" officeooo:paragraph-rsid="001cfcf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a125" officeooo:paragraph-rsid="001ea1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910" officeooo:paragraph-rsid="0020891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writing-mode="lr-tb"/>
      <style:text-properties style:font-name="Liberation Sans" fo:font-size="12pt" fo:font-weight="normal" officeooo:rsid="0022c483" officeooo:paragraph-rsid="0022c483"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fo:font-size="12pt" style:font-size-asian="12pt" style:font-size-complex="12pt"/>
    </style:style>
    <style:style style:name="P22" style:family="paragraph" style:parent-style-name="Standard">
      <style:paragraph-properties fo:text-align="start" style:justify-single-word="false" style:writing-mode="lr-tb"/>
      <style:text-properties style:font-name="Liberation Sans" fo:font-size="12pt" fo:font-weight="normal" officeooo:rsid="0026008a" officeooo:paragraph-rsid="0026008a"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Liberation Sans" fo:font-size="12pt" fo:font-weight="normal" officeooo:rsid="00348bc8" officeooo:paragraph-rsid="0064bcad"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Liberation Sans" fo:font-size="12pt" fo:font-weight="normal" officeooo:rsid="003722a2" officeooo:paragraph-rsid="003722a2" style:font-size-asian="12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officeooo:paragraph-rsid="0065a730"/>
    </style:style>
    <style:style style:name="P26" style:family="paragraph" style:parent-style-name="Standard">
      <style:paragraph-properties fo:text-align="start" style:justify-single-word="false" style:writing-mode="lr-tb"/>
      <style:text-properties style:font-name="Liberation Sans" fo:font-size="12pt" fo:font-weight="normal" officeooo:rsid="00473b19" officeooo:paragraph-rsid="0065a730" style:font-size-asian="12pt" style:font-weight-asian="normal" style:font-size-complex="12pt" style:font-weight-complex="normal"/>
    </style:style>
    <style:style style:name="P27" style:family="paragraph" style:parent-style-name="Standard">
      <style:paragraph-properties fo:text-align="star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9" style:family="paragraph" style:parent-style-name="Standard">
      <style:paragraph-properties fo:text-align="star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officeooo:paragraph-rsid="005026de"/>
    </style:style>
    <style:style style:name="P33" style:family="paragraph" style:parent-style-name="Table_20_Contents">
      <style:paragraph-properties fo:text-align="start" style:justify-single-word="false"/>
    </style:style>
    <style:style style:name="P34" style:family="paragraph" style:parent-style-name="Standard" style:list-style-name="L4">
      <style:paragraph-properties fo:text-align="start" style:justify-single-word="false" style:writing-mode="lr-tb"/>
      <style:text-properties officeooo:rsid="00560a3b" officeooo:paragraph-rsid="00560a3b"/>
    </style:style>
    <style:style style:name="P35" style:family="paragraph" style:parent-style-name="Standard">
      <style:paragraph-properties fo:text-align="start" style:justify-single-word="false" style:writing-mode="lr-tb"/>
      <style:text-properties officeooo:rsid="00560a3b" officeooo:paragraph-rsid="00560a3b"/>
    </style:style>
    <style:style style:name="P36" style:family="paragraph" style:parent-style-name="Standard">
      <style:paragraph-properties fo:text-align="start" style:justify-single-word="false" style:writing-mode="lr-tb"/>
      <style:text-properties officeooo:rsid="0056b4da" officeooo:paragraph-rsid="0056b4da"/>
    </style:style>
    <style:style style:name="P37" style:family="paragraph" style:parent-style-name="Standard">
      <style:paragraph-properties fo:text-align="start" style:justify-single-word="false" style:writing-mode="lr-tb"/>
      <style:text-properties officeooo:rsid="00577c45" officeooo:paragraph-rsid="00577c45"/>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a168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e058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writing-mode="lr-tb"/>
      <style:text-properties officeooo:rsid="005d19b0" officeooo:paragraph-rsid="00577c45"/>
    </style:style>
    <style:style style:name="P41" style:family="paragraph" style:parent-style-name="Standard">
      <style:paragraph-properties fo:text-align="start" style:justify-single-word="false" style:writing-mode="lr-tb"/>
      <style:text-properties officeooo:rsid="007122eb" officeooo:paragraph-rsid="007122eb"/>
    </style:style>
    <style:style style:name="P42" style:family="paragraph" style:parent-style-name="Standard">
      <style:paragraph-properties fo:text-align="start" style:justify-single-word="false" style:writing-mode="lr-tb"/>
      <style:text-properties officeooo:rsid="006ead19" officeooo:paragraph-rsid="007122eb"/>
    </style:style>
    <style:style style:name="P43" style:family="paragraph" style:parent-style-name="Table_20_Contents">
      <style:paragraph-properties fo:text-align="start" style:justify-single-word="false"/>
      <style:text-properties fo:font-weight="bold" officeooo:rsid="00790822" officeooo:paragraph-rsid="00790822" style:font-weight-asian="bold" style:font-weight-complex="bold"/>
    </style:style>
    <style:style style:name="P44" style:family="paragraph" style:parent-style-name="Table_20_Contents">
      <style:paragraph-properties fo:text-align="start" style:justify-single-word="false"/>
      <style:text-properties officeooo:paragraph-rsid="0076d9d5"/>
    </style:style>
    <style:style style:name="P45" style:family="paragraph" style:parent-style-name="Table_20_Contents">
      <style:paragraph-properties fo:text-align="start" style:justify-single-word="false"/>
      <style:text-properties officeooo:paragraph-rsid="006ead19"/>
    </style:style>
    <style:style style:name="P46" style:family="paragraph" style:parent-style-name="Table_20_Contents">
      <style:paragraph-properties fo:text-align="start" style:justify-single-word="false"/>
      <style:text-properties officeooo:paragraph-rsid="006fa8a9"/>
    </style:style>
    <style:style style:name="P47" style:family="paragraph" style:parent-style-name="Standard" style:list-style-name="L5">
      <style:paragraph-properties fo:text-align="start" style:justify-single-word="false" style:writing-mode="lr-tb"/>
      <style:text-properties officeooo:rsid="0072c1b5" officeooo:paragraph-rsid="007918ad"/>
    </style:style>
    <style:style style:name="P48" style:family="paragraph" style:parent-style-name="Standard">
      <style:paragraph-properties fo:text-align="start" style:justify-single-word="false" style:writing-mode="lr-tb"/>
      <style:text-properties officeooo:rsid="0072c1b5" officeooo:paragraph-rsid="007918ad"/>
    </style:style>
    <style:style style:name="P49" style:family="paragraph" style:parent-style-name="Standard">
      <style:paragraph-properties fo:text-align="center" style:justify-single-word="false" style:writing-mode="lr-tb"/>
      <style:text-properties officeooo:rsid="00dd97e1" officeooo:paragraph-rsid="00dd97e1"/>
    </style:style>
    <style:style style:name="P50" style:family="paragraph" style:parent-style-name="Table_20_Contents">
      <style:paragraph-properties fo:text-align="start" style:justify-single-word="false"/>
      <style:text-properties fo:font-weight="bold" officeooo:rsid="0079b016" officeooo:paragraph-rsid="0079b016" style:font-weight-asian="bold" style:font-weight-complex="bold"/>
    </style:style>
    <style:style style:name="P51" style:family="paragraph" style:parent-style-name="Table_20_Contents">
      <style:paragraph-properties fo:text-align="start" style:justify-single-word="false"/>
      <style:text-properties officeooo:rsid="0079b016" officeooo:paragraph-rsid="0079b016"/>
    </style:style>
    <style:style style:name="P52" style:family="paragraph" style:parent-style-name="Table_20_Contents">
      <style:paragraph-properties fo:text-align="start" style:justify-single-word="false"/>
      <style:text-properties fo:font-weight="bold" officeooo:rsid="007af7b4" officeooo:paragraph-rsid="007af7b4" style:font-weight-asian="bold" style:font-weight-complex="bold"/>
    </style:style>
    <style:style style:name="P53" style:family="paragraph" style:parent-style-name="Table_20_Contents">
      <style:paragraph-properties fo:text-align="start" style:justify-single-word="false"/>
      <style:text-properties officeooo:rsid="007af7b4" officeooo:paragraph-rsid="007af7b4"/>
    </style:style>
    <style:style style:name="P54" style:family="paragraph" style:parent-style-name="Table_20_Contents">
      <style:paragraph-properties fo:text-align="start" style:justify-single-word="false"/>
      <style:text-properties officeooo:rsid="007b1931" officeooo:paragraph-rsid="007b1931"/>
    </style:style>
    <style:style style:name="P55" style:family="paragraph" style:parent-style-name="Table_20_Contents">
      <style:paragraph-properties fo:text-align="start" style:justify-single-word="false"/>
      <style:text-properties officeooo:rsid="007cbb09" officeooo:paragraph-rsid="007cbb09"/>
    </style:style>
    <style:style style:name="P56" style:family="paragraph" style:parent-style-name="Table_20_Contents">
      <style:paragraph-properties fo:text-align="start" style:justify-single-word="false"/>
      <style:text-properties officeooo:rsid="007ce724" officeooo:paragraph-rsid="007ce724"/>
    </style:style>
    <style:style style:name="P57" style:family="paragraph" style:parent-style-name="Table_20_Contents">
      <style:paragraph-properties fo:text-align="start" style:justify-single-word="false"/>
      <style:text-properties officeooo:rsid="007e9316" officeooo:paragraph-rsid="007e9316"/>
    </style:style>
    <style:style style:name="P58" style:family="paragraph" style:parent-style-name="Table_20_Contents">
      <style:paragraph-properties fo:text-align="start" style:justify-single-word="false"/>
      <style:text-properties officeooo:rsid="007f7969" officeooo:paragraph-rsid="007f7969"/>
    </style:style>
    <style:style style:name="P59" style:family="paragraph" style:parent-style-name="Standard">
      <style:paragraph-properties fo:text-align="start" style:justify-single-word="false" style:writing-mode="lr-tb"/>
      <style:text-properties officeooo:rsid="005d19b0" officeooo:paragraph-rsid="005d19b0"/>
    </style:style>
    <style:style style:name="P60" style:family="paragraph" style:parent-style-name="Standard" style:list-style-name="L6">
      <style:paragraph-properties fo:text-align="start" style:justify-single-word="false" style:writing-mode="lr-tb"/>
      <style:text-properties officeooo:rsid="0081fae8" officeooo:paragraph-rsid="0081fae8"/>
    </style:style>
    <style:style style:name="P61" style:family="paragraph" style:parent-style-name="Standard" style:list-style-name="L6">
      <style:paragraph-properties fo:text-align="start" style:justify-single-word="false" style:writing-mode="lr-tb"/>
      <style:text-properties officeooo:rsid="0083e1bf" officeooo:paragraph-rsid="0083e1bf"/>
    </style:style>
    <style:style style:name="P62" style:family="paragraph" style:parent-style-name="Standard">
      <style:paragraph-properties fo:text-align="start" style:justify-single-word="false" style:writing-mode="lr-tb"/>
      <style:text-properties officeooo:rsid="0085f04a" officeooo:paragraph-rsid="0085f04a"/>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writing-mode="lr-tb"/>
      <style:text-properties officeooo:rsid="0085f04a" officeooo:paragraph-rsid="009e8634"/>
    </style:style>
    <style:style style:name="P65" style:family="paragraph" style:parent-style-name="Standard">
      <style:paragraph-properties fo:text-align="start" style:justify-single-word="false" style:writing-mode="lr-tb"/>
      <style:text-properties fo:font-style="normal" officeooo:rsid="00886dde" officeooo:paragraph-rsid="0085f04a" style:font-style-asian="normal" style:font-style-complex="normal"/>
    </style:style>
    <style:style style:name="P66" style:family="paragraph" style:parent-style-name="Standard">
      <style:paragraph-properties fo:text-align="start" style:justify-single-word="false" style:writing-mode="lr-tb"/>
      <style:text-properties fo:font-style="normal" officeooo:rsid="008ddc41" officeooo:paragraph-rsid="008ddc41" style:font-style-asian="normal" style:font-style-complex="normal"/>
    </style:style>
    <style:style style:name="P67" style:family="paragraph" style:parent-style-name="Table_20_Contents">
      <style:paragraph-properties fo:text-align="start" style:justify-single-word="false"/>
      <style:text-properties fo:color="#127622"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e0f9" officeooo:paragraph-rsid="008ee0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writing-mode="lr-tb"/>
      <style:text-properties fo:font-style="normal" officeooo:rsid="00acea16" officeooo:paragraph-rsid="00acea16" style:font-style-asian="normal" style:font-style-complex="normal"/>
    </style:style>
    <style:style style:name="P71" style:family="paragraph" style:parent-style-name="Table_20_Contents">
      <style:paragraph-properties fo:text-align="start" style:justify-single-word="false"/>
      <style:text-properties fo:font-style="normal" fo:font-weight="bold" officeooo:rsid="0094918b" officeooo:paragraph-rsid="00b274b4" style:font-style-asian="normal" style:font-weight-asian="bold" style:font-style-complex="normal" style:font-weight-complex="bold"/>
    </style:style>
    <style:style style:name="P72" style:family="paragraph" style:parent-style-name="Table_20_Contents">
      <style:paragraph-properties fo:text-align="start" style:justify-single-word="false"/>
      <style:text-properties officeooo:paragraph-rsid="00b274b4"/>
    </style:style>
    <style:style style:name="P73" style:family="paragraph" style:parent-style-name="Table_20_Contents">
      <style:paragraph-properties fo:text-align="start" style:justify-single-word="false"/>
      <style:text-properties officeooo:paragraph-rsid="00975cbf"/>
    </style:style>
    <style:style style:name="P74" style:family="paragraph" style:parent-style-name="Table_20_Contents">
      <style:paragraph-properties fo:text-align="start" style:justify-single-word="false"/>
      <style:text-properties officeooo:paragraph-rsid="009bb086"/>
    </style:style>
    <style:style style:name="P75" style:family="paragraph" style:parent-style-name="Standard">
      <style:paragraph-properties fo:text-align="start" style:justify-single-word="false" style:writing-mode="lr-tb"/>
      <style:text-properties fo:font-style="normal" officeooo:rsid="0094918b" officeooo:paragraph-rsid="0094918b" style:font-style-asian="normal" style:font-style-complex="normal"/>
    </style:style>
    <style:style style:name="P76" style:family="paragraph" style:parent-style-name="Standard">
      <style:paragraph-properties fo:text-align="center" style:justify-single-word="false" style:writing-mode="lr-tb"/>
      <style:text-properties style:font-name="Gabriela Nerd Font" fo:font-size="14pt" fo:font-style="normal" officeooo:rsid="00d11611" officeooo:paragraph-rsid="00d11611" style:font-size-asian="14pt" style:font-style-asian="normal" style:font-size-complex="14pt" style:font-style-complex="normal"/>
    </style:style>
    <style:style style:name="P77" style:family="paragraph" style:parent-style-name="Standard">
      <style:paragraph-properties fo:text-align="start" style:justify-single-word="false" style:writing-mode="lr-tb"/>
      <style:text-properties fo:font-style="normal" officeooo:rsid="00b5c922" officeooo:paragraph-rsid="00b5c922" style:font-style-asian="normal" style:font-style-complex="normal"/>
    </style:style>
    <style:style style:name="P78" style:family="paragraph" style:parent-style-name="Standard">
      <style:paragraph-properties fo:text-align="start" style:justify-single-word="false" style:writing-mode="lr-tb"/>
      <style:text-properties fo:font-style="normal" officeooo:rsid="00bdb19e" officeooo:paragraph-rsid="00bdb19e" style:font-style-asian="normal" style:font-style-complex="normal"/>
    </style:style>
    <style:style style:name="P79" style:family="paragraph" style:parent-style-name="Table_20_Contents">
      <style:paragraph-properties fo:text-align="start" style:justify-single-word="false"/>
      <style:text-properties fo:font-weight="bold" officeooo:rsid="00b3a356" officeooo:paragraph-rsid="00b3a356" style:font-weight-asian="bold" style:font-weight-complex="bold"/>
    </style:style>
    <style:style style:name="P80" style:family="paragraph" style:parent-style-name="Table_20_Contents">
      <style:paragraph-properties fo:text-align="start" style:justify-single-word="false"/>
      <style:text-properties fo:font-weight="bold" officeooo:rsid="00b4c555" officeooo:paragraph-rsid="00b4c555" style:font-weight-asian="bold" style:font-weight-complex="bold"/>
    </style:style>
    <style:style style:name="P81" style:family="paragraph" style:parent-style-name="Table_20_Contents">
      <style:paragraph-properties fo:text-align="start" style:justify-single-word="false"/>
      <style:text-properties fo:font-weight="bold" officeooo:rsid="00b4daa6" officeooo:paragraph-rsid="00b4daa6" style:font-weight-asian="bold" style:font-weight-complex="bold"/>
    </style:style>
    <style:style style:name="P82" style:family="paragraph" style:parent-style-name="Table_20_Contents">
      <style:paragraph-properties fo:text-align="start" style:justify-single-word="false"/>
      <style:text-properties fo:font-weight="normal" officeooo:rsid="00b4c555" officeooo:paragraph-rsid="00b4c555" style:font-weight-asian="normal" style:font-weight-complex="normal"/>
    </style:style>
    <style:style style:name="P83" style:family="paragraph" style:parent-style-name="Standard">
      <style:paragraph-properties fo:text-align="start" style:justify-single-word="false" style:writing-mode="lr-tb"/>
      <style:text-properties fo:font-style="normal" officeooo:rsid="00b7f60d" officeooo:paragraph-rsid="00c0286b" style:font-style-asian="normal" style:font-style-complex="normal"/>
    </style:style>
    <style:style style:name="P84" style:family="paragraph" style:parent-style-name="Standard">
      <style:paragraph-properties fo:text-align="start" style:justify-single-word="false" style:writing-mode="lr-tb"/>
      <style:text-properties fo:font-style="normal" officeooo:rsid="00b7f60d" officeooo:paragraph-rsid="010ec44e" style:font-style-asian="normal" style:font-style-complex="normal"/>
    </style:style>
    <style:style style:name="P85" style:family="paragraph" style:parent-style-name="Standard">
      <style:paragraph-properties fo:text-align="start" style:justify-single-word="false" style:writing-mode="lr-tb"/>
      <style:text-properties fo:font-style="normal" officeooo:rsid="00b7f60d" officeooo:paragraph-rsid="00b9034d" style:font-style-asian="normal" style:font-style-complex="normal"/>
    </style:style>
    <style:style style:name="P86" style:family="paragraph" style:parent-style-name="Standard">
      <style:paragraph-properties fo:text-align="start" style:justify-single-word="false" style:writing-mode="lr-tb"/>
      <style:text-properties fo:font-style="normal" officeooo:rsid="00bb4b49" officeooo:paragraph-rsid="00bb4b49" style:font-style-asian="normal" style:font-style-complex="normal"/>
    </style:style>
    <style:style style:name="P87" style:family="paragraph" style:parent-style-name="Standard">
      <style:paragraph-properties fo:text-align="start" style:justify-single-word="false" style:writing-mode="lr-tb"/>
      <style:text-properties fo:font-style="normal" officeooo:rsid="00c0286b" officeooo:paragraph-rsid="00c0286b" style:font-style-asian="normal" style:font-style-complex="normal"/>
    </style:style>
    <style:style style:name="P88" style:family="paragraph" style:parent-style-name="Standard">
      <style:paragraph-properties fo:text-align="start" style:justify-single-word="false" style:writing-mode="lr-tb"/>
      <style:text-properties fo:font-style="normal" officeooo:rsid="00bb4b49" officeooo:paragraph-rsid="00c0286b" style:font-style-asian="normal" style:font-style-complex="normal"/>
    </style:style>
    <style:style style:name="P89" style:family="paragraph" style:parent-style-name="Table_20_Contents">
      <style:paragraph-properties fo:text-align="start" style:justify-single-word="false"/>
      <style:text-properties fo:font-weight="bold" officeooo:rsid="00bfb04f" officeooo:paragraph-rsid="00bfb04f" style:font-weight-asian="bold" style:font-weight-complex="bold"/>
    </style:style>
    <style:style style:name="P90" style:family="paragraph" style:parent-style-name="Table_20_Contents">
      <style:paragraph-properties fo:text-align="start" style:justify-single-word="false"/>
      <style:text-properties officeooo:paragraph-rsid="00bfb04f"/>
    </style:style>
    <style:style style:name="P91" style:family="paragraph" style:parent-style-name="Table_20_Contents">
      <style:paragraph-properties fo:text-align="start" style:justify-single-word="false"/>
      <style:text-properties fo:color="#127622" loext:opacity="100%" officeooo:paragraph-rsid="00c0286b"/>
    </style:style>
    <style:style style:name="P92" style:family="paragraph" style:parent-style-name="Table_20_Contents">
      <style:paragraph-properties fo:text-align="start" style:justify-single-word="false"/>
      <style:text-properties officeooo:paragraph-rsid="00c0286b"/>
    </style:style>
    <style:style style:name="P93" style:family="paragraph" style:parent-style-name="Standard" style:list-style-name="L7">
      <style:paragraph-properties fo:text-align="start" style:justify-single-word="false" style:writing-mode="lr-tb"/>
      <style:text-properties fo:font-style="normal" officeooo:rsid="00c50a1b" officeooo:paragraph-rsid="00c50a1b" style:font-style-asian="normal" style:font-style-complex="normal"/>
    </style:style>
    <style:style style:name="P94" style:family="paragraph" style:parent-style-name="Standard" style:list-style-name="L7">
      <style:paragraph-properties fo:text-align="start" style:justify-single-word="false" style:writing-mode="lr-tb"/>
      <style:text-properties fo:font-style="normal" officeooo:rsid="00c06c45" officeooo:paragraph-rsid="00c92dde" style:font-style-asian="normal" style:font-style-complex="normal"/>
    </style:style>
    <style:style style:name="P95" style:family="paragraph" style:parent-style-name="Standard">
      <style:paragraph-properties fo:text-align="start" style:justify-single-word="false" style:writing-mode="lr-tb"/>
      <style:text-properties fo:font-style="normal" officeooo:rsid="00c06c45" officeooo:paragraph-rsid="00c06c45" style:font-style-asian="normal" style:font-style-complex="normal"/>
    </style:style>
    <style:style style:name="P96" style:family="paragraph" style:parent-style-name="Standard" style:list-style-name="L8">
      <style:paragraph-properties fo:text-align="start" style:justify-single-word="false" style:writing-mode="lr-tb"/>
      <style:text-properties fo:font-style="normal" officeooo:rsid="00cd918c" officeooo:paragraph-rsid="00cd918c" style:font-style-asian="normal" style:font-style-complex="normal"/>
    </style:style>
    <style:style style:name="P97" style:family="paragraph" style:parent-style-name="Standard">
      <style:paragraph-properties fo:text-align="start" style:justify-single-word="false" style:writing-mode="lr-tb"/>
      <style:text-properties fo:font-style="normal" officeooo:rsid="00cd918c" officeooo:paragraph-rsid="00cd918c" style:font-style-asian="normal" style:font-style-complex="normal"/>
    </style:style>
    <style:style style:name="P98" style:family="paragraph" style:parent-style-name="Standard">
      <style:paragraph-properties fo:text-align="start" style:justify-single-word="false" style:writing-mode="lr-tb"/>
      <style:text-properties fo:font-style="normal" officeooo:rsid="01162c60" officeooo:paragraph-rsid="01230b11" style:font-style-asian="normal" style:font-style-complex="normal"/>
    </style:style>
    <style:style style:name="P99" style:family="paragraph" style:parent-style-name="Standard">
      <style:paragraph-properties fo:text-align="start" style:justify-single-word="false" style:writing-mode="lr-tb"/>
      <style:text-properties officeooo:paragraph-rsid="01230b11"/>
    </style:style>
    <style:style style:name="P100" style:family="paragraph" style:parent-style-name="Standard">
      <style:paragraph-properties fo:text-align="start" style:justify-single-word="false" style:writing-mode="lr-tb"/>
      <style:text-properties fo:font-style="normal" officeooo:rsid="01162c60" officeooo:paragraph-rsid="01162c60" style:font-style-asian="normal" style:font-style-complex="normal"/>
    </style:style>
    <style:style style:name="P101" style:family="paragraph" style:parent-style-name="Standard">
      <style:paragraph-properties fo:text-align="start" style:justify-single-word="false" style:writing-mode="lr-tb"/>
      <style:text-properties fo:font-style="normal" officeooo:rsid="0117d1ed" officeooo:paragraph-rsid="0117d1ed" style:font-style-asian="normal" style:font-style-complex="normal"/>
    </style:style>
    <style:style style:name="P102" style:family="paragraph" style:parent-style-name="Standard">
      <style:paragraph-properties fo:text-align="start" style:justify-single-word="false" style:writing-mode="lr-tb"/>
      <style:text-properties fo:font-style="normal" officeooo:rsid="012189fd" officeooo:paragraph-rsid="012189fd" style:font-style-asian="normal" style:font-style-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text-position="super 58%" fo:font-size="12pt" style:font-size-asian="12pt" style:font-size-complex="12pt"/>
    </style:style>
    <style:style style:name="T4" style:family="text">
      <style:text-properties officeooo:rsid="001268db"/>
    </style:style>
    <style:style style:name="T5" style:family="text">
      <style:text-properties fo:font-weight="normal" style:font-weight-asian="normal" style:font-weight-complex="normal"/>
    </style:style>
    <style:style style:name="T6" style:family="text">
      <style:text-properties fo:color="#127622" loext:opacity="100%"/>
    </style:style>
    <style:style style:name="T7" style:family="text">
      <style:text-properties fo:color="#127622" loext:opacity="100%" officeooo:rsid="001174ba"/>
    </style:style>
    <style:style style:name="T8" style:family="text">
      <style:text-properties officeooo:rsid="00184fe3"/>
    </style:style>
    <style:style style:name="T9" style:family="text">
      <style:text-properties officeooo:rsid="00142569"/>
    </style:style>
    <style:style style:name="T10" style:family="text">
      <style:text-properties officeooo:rsid="00ec0c08"/>
    </style:style>
    <style:style style:name="T11" style:family="text">
      <style:text-properties fo:color="#127622" loext:opacity="100%" officeooo:rsid="0014256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color="#127622" loext:opacity="100%"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0635c8e" style:font-style-asian="normal" style:font-style-complex="normal"/>
    </style:style>
    <style:style style:name="T18" style:family="text">
      <style:text-properties fo:font-style="normal" officeooo:rsid="002b3e01" style:font-style-asian="normal" style:font-style-complex="normal"/>
    </style:style>
    <style:style style:name="T19" style:family="text">
      <style:text-properties fo:font-style="normal" officeooo:rsid="002db306" style:font-style-asian="normal" style:font-style-complex="normal"/>
    </style:style>
    <style:style style:name="T20" style:family="text">
      <style:text-properties fo:color="#127622" loext:opacity="100%" fo:font-style="normal" officeooo:rsid="002db306" style:font-style-asian="normal" style:font-style-complex="normal"/>
    </style:style>
    <style:style style:name="T21" style:family="text">
      <style:text-properties officeooo:rsid="00172653"/>
    </style:style>
    <style:style style:name="T22" style:family="text">
      <style:text-properties fo:background-color="#ffffd7" loext:char-shading-value="0"/>
    </style:style>
    <style:style style:name="T23" style:family="text">
      <style:text-properties fo:background-color="#fff5ce" loext:char-shading-value="0"/>
    </style:style>
    <style:style style:name="T24" style:family="text">
      <style:text-properties officeooo:rsid="00eeb407"/>
    </style:style>
    <style:style style:name="T25" style:family="text">
      <style:text-properties fo:background-color="#ffffd7" loext:char-shading-value="0"/>
    </style:style>
    <style:style style:name="T26" style:family="text">
      <style:text-properties fo:background-color="#ffdbb6" loext:char-shading-value="0"/>
    </style:style>
    <style:style style:name="T27" style:family="text">
      <style:text-properties fo:background-color="#ffd8ce" loext:char-shading-value="0"/>
    </style:style>
    <style:style style:name="T28" style:family="text">
      <style:text-properties fo:background-color="#ffd7d7" loext:char-shading-value="0"/>
    </style:style>
    <style:style style:name="T29" style:family="text">
      <style:text-properties fo:background-color="#f7d1d5" loext:char-shading-value="0"/>
    </style:style>
    <style:style style:name="T30" style:family="text">
      <style:text-properties officeooo:rsid="0063a46b"/>
    </style:style>
    <style:style style:name="T31" style:family="text">
      <style:text-properties officeooo:rsid="00270cb8"/>
    </style:style>
    <style:style style:name="T32" style:family="text">
      <style:text-properties officeooo:rsid="0031e92b"/>
    </style:style>
    <style:style style:name="T33" style:family="text">
      <style:text-properties officeooo:rsid="00f06279"/>
    </style:style>
    <style:style style:name="T34" style:family="text">
      <style:text-properties fo:color="#127622" loext:opacity="100%" officeooo:rsid="00f0e6d7"/>
    </style:style>
    <style:style style:name="T35" style:family="text">
      <style:text-properties officeooo:rsid="00f0e6d7"/>
    </style:style>
    <style:style style:name="T36" style:family="text">
      <style:text-properties fo:color="#127622" loext:opacity="100%" officeooo:rsid="00f65e28"/>
    </style:style>
    <style:style style:name="T37" style:family="text">
      <style:text-properties officeooo:rsid="00f65e28"/>
    </style:style>
    <style:style style:name="T38" style:family="text">
      <style:text-properties fo:color="#127622" loext:opacity="100%" officeooo:rsid="00f724e1"/>
    </style:style>
    <style:style style:name="T39" style:family="text">
      <style:text-properties officeooo:rsid="00f724e1"/>
    </style:style>
    <style:style style:name="T40" style:family="text">
      <style:text-properties officeooo:rsid="003585e4"/>
    </style:style>
    <style:style style:name="T41" style:family="text">
      <style:text-properties officeooo:rsid="003722a2"/>
    </style:style>
    <style:style style:name="T42" style:family="text">
      <style:text-properties officeooo:rsid="0037637c"/>
    </style:style>
    <style:style style:name="T43" style:family="text">
      <style:text-properties style:text-position="super 58%" officeooo:rsid="0037637c"/>
    </style:style>
    <style:style style:name="T44" style:family="text">
      <style:text-properties style:font-name="Liberation Sans" fo:font-size="12pt" fo:font-weight="normal" officeooo:rsid="0037ec06" style:font-size-asian="12pt" style:font-weight-asian="normal" style:font-size-complex="12pt" style:font-weight-complex="normal"/>
    </style:style>
    <style:style style:name="T45" style:family="text">
      <style:text-properties style:font-name="Liberation Sans" fo:font-size="12pt" fo:font-weight="normal" officeooo:rsid="0039d6b0" style:font-size-asian="12pt" style:font-weight-asian="normal" style:font-size-complex="12pt" style:font-weight-complex="normal"/>
    </style:style>
    <style:style style:name="T46" style:family="text">
      <style:text-properties style:font-name="Liberation Sans" fo:font-size="12pt" fo:font-weight="normal" officeooo:rsid="00402107" style:font-size-asian="12pt" style:font-weight-asian="normal" style:font-size-complex="12pt" style:font-weight-complex="normal"/>
    </style:style>
    <style:style style:name="T47" style:family="text">
      <style:text-properties style:font-name="Liberation Sans" fo:font-size="12pt" fo:font-weight="normal" officeooo:rsid="0041b0c9" style:font-size-asian="12pt" style:font-weight-asian="normal" style:font-size-complex="12pt" style:font-weight-complex="normal"/>
    </style:style>
    <style:style style:name="T48" style:family="text">
      <style:text-properties style:font-name="Liberation Sans" fo:font-size="12pt" fo:font-weight="normal" officeooo:rsid="004621af" style:font-size-asian="12pt" style:font-weight-asian="normal" style:font-size-complex="12pt" style:font-weight-complex="normal"/>
    </style:style>
    <style:style style:name="T49" style:family="text">
      <style:text-properties style:font-name="Liberation Sans" fo:font-size="12pt" fo:font-weight="normal" officeooo:rsid="0046604a" style:font-size-asian="12pt" style:font-weight-asian="normal" style:font-size-complex="12pt" style:font-weight-complex="normal"/>
    </style:style>
    <style:style style:name="T50" style:family="text">
      <style:text-properties style:font-name="Liberation Sans" fo:font-size="12pt" fo:font-style="italic" fo:font-weight="normal" officeooo:rsid="004621af" style:font-size-asian="12pt" style:font-style-asian="italic" style:font-weight-asian="normal" style:font-size-complex="12pt" style:font-style-complex="italic" style:font-weight-complex="normal"/>
    </style:style>
    <style:style style:name="T51" style:family="text">
      <style:text-properties officeooo:rsid="005fd299"/>
    </style:style>
    <style:style style:name="T52" style:family="text">
      <style:text-properties officeooo:rsid="0065588d"/>
    </style:style>
    <style:style style:name="T53" style:family="text">
      <style:text-properties style:font-name="Liberation Sans" fo:font-size="12pt" fo:font-weight="normal" officeooo:rsid="00473b19" style:font-size-asian="12pt" style:font-weight-asian="normal" style:font-size-complex="12pt" style:font-weight-complex="normal"/>
    </style:style>
    <style:style style:name="T54" style:family="text">
      <style:text-properties style:font-name="Liberation Sans" fo:font-size="12pt" fo:font-weight="normal" officeooo:rsid="00459c68" style:font-size-asian="12pt" style:font-weight-asian="normal" style:font-size-complex="12pt" style:font-weight-complex="normal"/>
    </style:style>
    <style:style style:name="T55" style:family="text">
      <style:text-properties style:font-name="Liberation Sans" fo:font-size="12pt" fo:font-weight="normal" officeooo:rsid="00482950" style:font-size-asian="12pt" style:font-weight-asian="normal" style:font-size-complex="12pt" style:font-weight-complex="normal"/>
    </style:style>
    <style:style style:name="T56" style:family="text">
      <style:text-properties style:font-name="Liberation Sans" fo:font-size="12pt" fo:font-weight="normal" officeooo:rsid="0048d70f" style:font-size-asian="12pt" style:font-weight-asian="normal" style:font-size-complex="12pt" style:font-weight-complex="normal"/>
    </style:style>
    <style:style style:name="T57" style:family="text">
      <style:text-properties style:text-position="super 58%" officeooo:rsid="004a179d" fo:background-color="transparent" loext:char-shading-value="0"/>
    </style:style>
    <style:style style:name="T58" style:family="text">
      <style:text-properties officeooo:rsid="0061bc56"/>
    </style:style>
    <style:style style:name="T59" style:family="text">
      <style:text-properties style:text-position="super 58%" officeooo:rsid="004b23ee" fo:background-color="transparent" loext:char-shading-value="0"/>
    </style:style>
    <style:style style:name="T60" style:family="text">
      <style:text-properties officeooo:rsid="00fbd02d"/>
    </style:style>
    <style:style style:name="T61" style:family="text">
      <style:text-properties officeooo:rsid="004c6233"/>
    </style:style>
    <style:style style:name="T62" style:family="text">
      <style:text-properties officeooo:rsid="004cd0f4"/>
    </style:style>
    <style:style style:name="T63" style:family="text">
      <style:text-properties officeooo:rsid="006873d6"/>
    </style:style>
    <style:style style:name="T64" style:family="text">
      <style:text-properties officeooo:rsid="00675573"/>
    </style:style>
    <style:style style:name="T65" style:family="text">
      <style:text-properties style:text-position="super 58%" officeooo:rsid="004e7424" fo:background-color="transparent" loext:char-shading-value="0"/>
    </style:style>
    <style:style style:name="T66" style:family="text">
      <style:text-properties officeooo:rsid="00694e94"/>
    </style:style>
    <style:style style:name="T67" style:family="text">
      <style:text-properties style:text-position="super 58%" officeooo:rsid="005026de" fo:background-color="transparent" loext:char-shading-value="0"/>
    </style:style>
    <style:style style:name="T68" style:family="text">
      <style:text-properties style:font-name="Liberation Sans" fo:font-size="12pt" fo:font-weight="normal" officeooo:rsid="005026de" style:font-size-asian="12pt" style:font-weight-asian="normal" style:font-size-complex="12pt" style:font-weight-complex="normal"/>
    </style:style>
    <style:style style:name="T69" style:family="text">
      <style:text-properties style:font-name="Liberation Sans" fo:font-size="12pt" fo:font-weight="normal" officeooo:rsid="0053441a" style:font-size-asian="12pt" style:font-weight-asian="normal" style:font-size-complex="12pt" style:font-weight-complex="normal"/>
    </style:style>
    <style:style style:name="T70" style:family="text">
      <style:text-properties style:font-name="Liberation Sans" fo:font-size="12pt" fo:font-style="normal" fo:font-weight="normal" officeooo:rsid="005026de" style:font-size-asian="12pt" style:font-style-asian="normal" style:font-weight-asian="normal" style:font-size-complex="12pt" style:font-style-complex="normal" style:font-weight-complex="normal"/>
    </style:style>
    <style:style style:name="T71" style:family="text">
      <style:text-properties style:font-name="Liberation Sans" fo:font-size="12pt" fo:font-style="normal" fo:font-weight="normal" officeooo:rsid="0053441a"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fo:font-weight="normal" officeooo:rsid="00538a16" style:font-size-asian="12pt" style:font-style-asian="normal" style:font-weight-asian="normal" style:font-size-complex="12pt" style:font-style-complex="normal" style:font-weight-complex="normal"/>
    </style:style>
    <style:style style:name="T73" style:family="text">
      <style:text-properties style:font-name="Liberation Sans" fo:font-size="12pt" fo:font-style="italic" fo:font-weight="normal" officeooo:rsid="0053441a" style:font-size-asian="12pt" style:font-style-asian="italic" style:font-weight-asian="normal" style:font-size-complex="12pt" style:font-style-complex="italic" style:font-weight-complex="normal"/>
    </style:style>
    <style:style style:name="T74" style:family="text">
      <style:text-properties style:text-position="super 58%" officeooo:rsid="005503be" fo:background-color="transparent" loext:char-shading-value="0"/>
    </style:style>
    <style:style style:name="T75" style:family="text">
      <style:text-properties officeooo:rsid="00db7767"/>
    </style:style>
    <style:style style:name="T76" style:family="text">
      <style:text-properties style:text-position="super 58%" officeooo:rsid="0056b4da" fo:background-color="transparent" loext:char-shading-value="0"/>
    </style:style>
    <style:style style:name="T77" style:family="text">
      <style:text-properties officeooo:rsid="0058ae63"/>
    </style:style>
    <style:style style:name="T78" style:family="text">
      <style:text-properties officeooo:rsid="0059c633"/>
    </style:style>
    <style:style style:name="T79" style:family="text">
      <style:text-properties officeooo:rsid="005a3541"/>
    </style:style>
    <style:style style:name="T80" style:family="text">
      <style:text-properties fo:color="#127622" loext:opacity="100%" officeooo:rsid="005a3541"/>
    </style:style>
    <style:style style:name="T81" style:family="text">
      <style:text-properties style:text-position="super 58%"/>
    </style:style>
    <style:style style:name="T82" style:family="text">
      <style:text-properties officeooo:rsid="0077bf21"/>
    </style:style>
    <style:style style:name="T83" style:family="text">
      <style:text-properties officeooo:rsid="00fdfdb4"/>
    </style:style>
    <style:style style:name="T84" style:family="text">
      <style:text-properties fo:color="#127622" loext:opacity="100%" officeooo:rsid="01010d6c"/>
    </style:style>
    <style:style style:name="T85" style:family="text">
      <style:text-properties officeooo:rsid="01010d6c"/>
    </style:style>
    <style:style style:name="T86" style:family="text">
      <style:text-properties style:font-name="Gabriela Nerd Font" fo:font-size="14pt" style:font-size-asian="12.25pt" style:font-size-complex="14pt"/>
    </style:style>
    <style:style style:name="T87" style:family="text">
      <style:text-properties officeooo:rsid="007cbb09"/>
    </style:style>
    <style:style style:name="T88" style:family="text">
      <style:text-properties officeooo:rsid="007ce724"/>
    </style:style>
    <style:style style:name="T89" style:family="text">
      <style:text-properties officeooo:rsid="007e9316"/>
    </style:style>
    <style:style style:name="T90" style:family="text">
      <style:text-properties officeooo:rsid="007f7969"/>
    </style:style>
    <style:style style:name="T91" style:family="text">
      <style:text-properties officeooo:rsid="008444c3"/>
    </style:style>
    <style:style style:name="T92" style:family="text">
      <style:text-properties officeooo:rsid="0101fd8d"/>
    </style:style>
    <style:style style:name="T93" style:family="text">
      <style:text-properties officeooo:rsid="00a5d32c"/>
    </style:style>
    <style:style style:name="T94" style:family="text">
      <style:text-properties officeooo:rsid="009c81f0"/>
    </style:style>
    <style:style style:name="T95" style:family="text">
      <style:text-properties fo:font-style="normal" officeooo:rsid="00a2de2d" style:font-style-asian="normal" style:font-style-complex="normal"/>
    </style:style>
    <style:style style:name="T96" style:family="text">
      <style:text-properties fo:font-style="normal" officeooo:rsid="00a34750" style:font-style-asian="normal" style:font-style-complex="normal"/>
    </style:style>
    <style:style style:name="T97" style:family="text">
      <style:text-properties fo:font-style="normal" officeooo:rsid="009e8634" style:font-style-asian="normal" style:font-style-complex="normal"/>
    </style:style>
    <style:style style:name="T98" style:family="text">
      <style:text-properties fo:font-style="italic" officeooo:rsid="009e8634" style:font-style-asian="italic" style:font-style-complex="italic"/>
    </style:style>
    <style:style style:name="T99" style:family="text">
      <style:text-properties fo:font-style="normal" officeooo:rsid="00a43dc9" style:font-style-asian="normal" style:font-style-complex="normal"/>
    </style:style>
    <style:style style:name="T100" style:family="text">
      <style:text-properties fo:font-style="normal" officeooo:rsid="00a23f1b" style:font-style-asian="normal" style:font-style-complex="normal"/>
    </style:style>
    <style:style style:name="T101" style:family="text">
      <style:text-properties fo:font-style="normal" officeooo:rsid="00a489fa" style:font-style-asian="normal" style:font-style-complex="normal"/>
    </style:style>
    <style:style style:name="T102" style:family="text">
      <style:text-properties fo:color="#127622" loext:opacity="100%" fo:font-style="normal" officeooo:rsid="009e99f8" style:font-style-asian="normal" style:font-style-complex="normal"/>
    </style:style>
    <style:style style:name="T103" style:family="text">
      <style:text-properties fo:font-style="normal" officeooo:rsid="009e99f8" style:font-style-asian="normal" style:font-style-complex="normal"/>
    </style:style>
    <style:style style:name="T104" style:family="text">
      <style:text-properties fo:font-style="normal" officeooo:rsid="00a09728" style:font-style-asian="normal" style:font-style-complex="normal"/>
    </style:style>
    <style:style style:name="T105" style:family="text">
      <style:text-properties fo:font-style="normal" officeooo:rsid="00a27021" style:font-style-asian="normal" style:font-style-complex="normal"/>
    </style:style>
    <style:style style:name="T106" style:family="text">
      <style:text-properties fo:font-style="normal" officeooo:rsid="00886dde" style:font-style-asian="normal" style:font-style-complex="normal"/>
    </style:style>
    <style:style style:name="T107" style:family="text">
      <style:text-properties fo:color="#127622" loext:opacity="100%" fo:font-style="normal" officeooo:rsid="00886dde" style:font-style-asian="normal" style:font-style-complex="normal"/>
    </style:style>
    <style:style style:name="T108" style:family="text">
      <style:text-properties fo:font-style="normal" officeooo:rsid="008ae86a" style:font-style-asian="normal" style:font-style-complex="normal"/>
    </style:style>
    <style:style style:name="T109" style:family="text">
      <style:text-properties fo:font-style="normal" officeooo:rsid="00aad8de" style:font-style-asian="normal" style:font-style-complex="normal"/>
    </style:style>
    <style:style style:name="T110" style:family="text">
      <style:text-properties fo:color="#ff0000" loext:opacity="100%"/>
    </style:style>
    <style:style style:name="T111" style:family="text">
      <style:text-properties fo:color="#ff0000" loext:opacity="100%" fo:background-color="#fff5ce" loext:char-shading-value="0"/>
    </style:style>
    <style:style style:name="T112" style:family="text">
      <style:text-properties officeooo:rsid="008ebd7f"/>
    </style:style>
    <style:style style:name="T113" style:family="text">
      <style:text-properties officeooo:rsid="010ad0b3"/>
    </style:style>
    <style:style style:name="T114" style:family="text">
      <style:text-properties officeooo:rsid="010bcec8"/>
    </style:style>
    <style:style style:name="T115" style:family="text">
      <style:text-properties fo:color="#127622" loext:opacity="100%" officeooo:rsid="00918f9e"/>
    </style:style>
    <style:style style:name="T116" style:family="text">
      <style:text-properties fo:color="#127622" loext:opacity="100%" officeooo:rsid="00929083"/>
    </style:style>
    <style:style style:name="T117" style:family="text">
      <style:text-properties officeooo:rsid="00918f9e"/>
    </style:style>
    <style:style style:name="T118" style:family="text">
      <style:text-properties fo:color="#127622" loext:opacity="100%" officeooo:rsid="00adf094"/>
    </style:style>
    <style:style style:name="T119" style:family="text">
      <style:text-properties officeooo:rsid="00afb46c"/>
    </style:style>
    <style:style style:name="T120" style:family="text">
      <style:text-properties style:text-underline-style="solid" style:text-underline-width="auto" style:text-underline-color="font-color" officeooo:rsid="00afb46c"/>
    </style:style>
    <style:style style:name="T121" style:family="text">
      <style:text-properties officeooo:rsid="0097b66d"/>
    </style:style>
    <style:style style:name="T122" style:family="text">
      <style:text-properties officeooo:rsid="00975cbf"/>
    </style:style>
    <style:style style:name="T123" style:family="text">
      <style:text-properties officeooo:rsid="00b3a356"/>
    </style:style>
    <style:style style:name="T124" style:family="text">
      <style:text-properties officeooo:rsid="00bc53c3"/>
    </style:style>
    <style:style style:name="T125" style:family="text">
      <style:text-properties officeooo:rsid="010d1251"/>
    </style:style>
    <style:style style:name="T126" style:family="text">
      <style:text-properties officeooo:rsid="00b9034d"/>
    </style:style>
    <style:style style:name="T127" style:family="text">
      <style:text-properties officeooo:rsid="00be8cda"/>
    </style:style>
    <style:style style:name="T128" style:family="text">
      <style:text-properties officeooo:rsid="00b965b1"/>
    </style:style>
    <style:style style:name="T129" style:family="text">
      <style:text-properties officeooo:rsid="00c3e0f1"/>
    </style:style>
    <style:style style:name="T130" style:family="text">
      <style:text-properties officeooo:rsid="01118c65"/>
    </style:style>
    <style:style style:name="T131" style:family="text">
      <style:text-properties fo:color="#127622" loext:opacity="100%" officeooo:rsid="01118c65"/>
    </style:style>
    <style:style style:name="T132" style:family="text">
      <style:text-properties officeooo:rsid="011198b6"/>
    </style:style>
    <style:style style:name="T133" style:family="text">
      <style:text-properties fo:font-style="italic" officeooo:rsid="00e61ce8" style:font-style-asian="italic" style:font-style-complex="italic"/>
    </style:style>
    <style:style style:name="T134" style:family="text">
      <style:text-properties officeooo:rsid="00e61ce8"/>
    </style:style>
    <style:style style:name="T135" style:family="text">
      <style:text-properties officeooo:rsid="00c50a1b"/>
    </style:style>
    <style:style style:name="T136" style:family="text">
      <style:text-properties officeooo:rsid="00c92dde"/>
    </style:style>
    <style:style style:name="T137" style:family="text">
      <style:text-properties officeooo:rsid="00c53d3a"/>
    </style:style>
    <style:style style:name="T138" style:family="text">
      <style:text-properties fo:color="#127622" loext:opacity="100%" officeooo:rsid="00c53d3a"/>
    </style:style>
    <style:style style:name="T139" style:family="text">
      <style:text-properties fo:color="#127622" loext:opacity="100%" officeooo:rsid="00e6b778"/>
    </style:style>
    <style:style style:name="T140" style:family="text">
      <style:text-properties fo:background-color="#fff5ce" loext:char-shading-value="0"/>
    </style:style>
    <style:style style:name="T141" style:family="text">
      <style:text-properties fo:background-color="#ffdbb6" loext:char-shading-value="0"/>
    </style:style>
    <style:style style:name="T142" style:family="text">
      <style:text-properties officeooo:rsid="00cde86d"/>
    </style:style>
    <style:style style:name="T143" style:family="text">
      <style:text-properties officeooo:rsid="00e84871"/>
    </style:style>
    <style:style style:name="T144" style:family="text">
      <style:text-properties fo:font-style="normal" officeooo:rsid="01162c60" style:font-style-asian="normal" style:font-style-complex="normal"/>
    </style:style>
    <style:style style:name="T145" style:family="text">
      <style:text-properties fo:font-style="normal" officeooo:rsid="01230b11" style:font-style-asian="normal" style:font-style-complex="normal"/>
    </style:style>
    <style:style style:name="T146" style:family="text">
      <style:text-properties fo:color="#127622" loext:opacity="100%" fo:font-style="normal" officeooo:rsid="01162c60" style:font-style-asian="normal" style:font-style-complex="normal"/>
    </style:style>
    <style:style style:name="T147" style:family="text">
      <style:text-properties fo:color="#127622" loext:opacity="100%" fo:font-style="normal" officeooo:rsid="01230b11" style:font-style-asian="normal" style:font-style-complex="normal"/>
    </style:style>
    <style:style style:name="T148" style:family="text">
      <style:text-properties fo:font-style="normal" officeooo:rsid="0125edde" style:font-style-asian="normal" style:font-style-complex="normal"/>
    </style:style>
    <style:style style:name="T149" style:family="text">
      <style:text-properties officeooo:rsid="011c166a"/>
    </style:style>
    <style:style style:name="T150" style:family="text">
      <style:text-properties officeooo:rsid="011e4596"/>
    </style:style>
    <style:style style:name="T151" style:family="text">
      <style:text-properties fo:color="#127622" loext:opacity="100%" officeooo:rsid="01206778"/>
    </style:style>
    <style:style style:name="T152" style:family="text">
      <style:text-properties officeooo:rsid="01206778"/>
    </style:style>
    <style:style style:name="T153" style:family="text">
      <style:text-properties officeooo:rsid="0119f1c7"/>
    </style:style>
    <style:style style:name="T154" style:family="text">
      <style:text-properties officeooo:rsid="0118f314"/>
    </style:style>
    <style:style style:name="T155" style:family="text">
      <style:text-properties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lachi 3:6a</text:p>
      <text:p text:style-name="P2">For I am the LORD, <text:span text:style-name="T1">I change not</text:span>;</text:p>
      <text:p text:style-name="P3"/>
      <text:p text:style-name="P4"><text:span text:style-name="T2">The King James version of the Bible uses for its translation what is referred to as “Early Modern English” (circa late 15</text:span><text:span text:style-name="T3">th</text:span><text:span text:style-name="T2"> century to mid-to-late 17</text:span><text:span text:style-name="T3">th</text:span><text:span text:style-name="T2"> century). While the definitions and common usages of those words have remained the same since that time the English language has changed significantly since then such that it is now comparatively referred to as “Modern English.”</text:span></text:p>
      <text:p text:style-name="P3"/>
      <text:p text:style-name="P5">Because of that, when you read God’s word, it’s very likely that when you see a word the idea of what you think it means in your mind can very easily not be what God meant at all. If you think that Satan and his ministers aren’t <text:span text:style-name="T4">both encouraging and using the difference in our understanding of the English language</text:span> to deceive <text:span text:style-name="T1">many</text:span><text:span text:style-name="T5">, think again:</text:span></text:p>
      <text:p text:style-name="P6"/>
      <table:table table:name="Table1" table:style-name="Table1">
        <table:table-column table:style-name="Table1.A"/>
        <table:table-row>
          <table:table-cell table:style-name="Table1.A1" office:value-type="string">
            <text:p text:style-name="P7"><text:span text:style-name="T6">Isaiah 14:14</text:span><text:span text:style-name="T7">b</text:span><text:line-break/>I will be like the most High.</text:p>
          </table:table-cell>
        </table:table-row>
        <table:table-row>
          <table:table-cell table:style-name="Table1.A2" office:value-type="string">
            <text:p text:style-name="P7"><text:span text:style-name="T6">2 Corinthians 11:14-15</text:span><text:line-break/>14 And no marvel; for Satan himself is transformed into an angel of light.</text:p>
            <text:p text:style-name="P7">15 Therefore it is no great thing if his ministers also be transformed as the ministers of righteousness; whose end shall be according to their works.</text:p>
          </table:table-cell>
        </table:table-row>
      </table:table>
      <text:p text:style-name="P8"/>
      <text:p text:style-name="P9">We’ll start with some simple examples and we’ll use the first two Google results for “English dictionary” to get our definitions from the world <text:span text:style-name="T8">(M</text:span>erriam-Webster <text:span text:style-name="T8">and Cambridge, because Oxford requires a subscription!</text:span>). <text:span text:style-name="T9">You’ll quickly notice that the worlds definitions for words are useful for interacting with the world but they do the exact opposite when you try to use them to </text:span><text:span text:style-name="T10">understand</text:span><text:span text:style-name="T9"> God’s word (</text:span><text:span text:style-name="T11">1 John 2:16</text:span><text:span text:style-name="T9">).</text:span></text:p>
      <text:p text:style-name="P9"/>
      <text:p text:style-name="P10">Studying God’s word takes <text:span text:style-name="T12">work</text:span><text:span text:style-name="T13"> and it </text:span><text:span text:style-name="T14">always</text:span><text:span text:style-name="T13"> will: </text:span><text:span text:style-name="T15">2 Timothy 2:15</text:span><text:span text:style-name="T13">: “...a </text:span><text:span text:style-name="T16">work</text:span><text:span text:style-name="T13">man”. If you try take the wrong shortcuts to make it easier, </text:span><text:span text:style-name="T17">that is sin, and that man of sin </text:span><text:span text:style-name="T13">is</text:span><text:span text:style-name="T18"> lying in wait</text:span><text:span text:style-name="T13"> to offer his candy coated poison </text:span><text:span text:style-name="T19">(</text:span><text:span text:style-name="T20">Gen 4:7</text:span><text:span text:style-name="T19">: “...if thou doest not well, sin lieth at the doo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onversation</text:p>
      <text:p text:style-name="P9"/>
      <text:p text:style-name="P12">The English word “conversation” appears 20 times in the King James Bible, in 20 different verses, in 16 different chapters, and in 10 different books<text:span text:style-name="T21">. </text:span><text:span text:style-name="T8">First, let’s look at the worlds definitions for this word.</text:span></text:p>
      <text:p text:style-name="P12"/>
      <table:table table:name="Table2" table:style-name="Table2" table:template-name="Default Style">
        <table:table-column table:style-name="Table2.A"/>
        <table:table-row table:style-name="Table2.1">
          <table:table-cell table:style-name="Table2.A1" office:value-type="string">
            <text:p text:style-name="P13">Merriam-Websters</text:p>
            <text:p text:style-name="P14">Conversation (noun)</text:p>
            <text:p text:style-name="P14">1 <text:span text:style-name="T1">a</text:span> (1): oral exchange of sentiments, observations, opinions, or ideas</text:p>
            <text:p text:style-name="P14"><text:s text:c="6"/>(2): an instance of such exchange: TALK</text:p>
            <text:p text:style-name="P14"><text:s text:c="3"/><text:span text:style-name="T1">b</text:span>: an informal discussion of an issue by representatives of governments, institutions, or groups</text:p>
            <text:p text:style-name="P14"><text:s text:c="3"/><text:span text:style-name="T1">c</text:span>: <text:span text:style-name="T22">an exchange similar to conversation</text:span></text:p>
            <text:p text:style-name="P15">2 <text:span text:style-name="T23">obsolete</text:span>: Conduct, Behavior</text:p>
          </table:table-cell>
        </table:table-row>
        <table:table-row>
          <table:table-cell table:style-name="Table2.A2" office:value-type="string">
            <text:p text:style-name="P16">Cambridge</text:p>
            <text:p text:style-name="P17">Conversation (noun)</text:p>
            <text:p text:style-name="P17"><text:span text:style-name="T1">a</text:span>: talk between two or more people in which thoughts, feelings, and ideas are expressed, questions are asked and answered, or news and information is exchanged:</text:p>
            <text:p text:style-name="P18"><text:span text:style-name="T1">b</text:span>: an informal, usually private, talk in which two or more people exchange thoughts, feelings, or ideas, or in which news or information is given or discussed: </text:p>
            <text:p text:style-name="P19"><text:span text:style-name="T1">c</text:span>: a discussion with someone about a particular subject</text:p>
          </table:table-cell>
        </table:table-row>
      </table:table>
      <text:p text:style-name="P8"/>
      <text:p text:style-name="P20">Ignoring the <text:span text:style-name="T24">definition that uses the word itself and the</text:span> obsolete definition, which means it’s no longer used, let’s take those and apply those to God’s word.</text:p>
      <text:p text:style-name="P20"/>
      <table:table table:name="Table3" table:style-name="Table3">
        <table:table-column table:style-name="Table3.A"/>
        <table:table-row>
          <table:table-cell table:style-name="Table3.A1" office:value-type="string">
            <text:p text:style-name="P21"><text:span text:style-name="T6">1 Timothy 4:12</text:span><text:line-break/>Let no man despise thy youth; but be thou an example of the believers, <text:span text:style-name="T25">in word</text:span>, <text:span text:style-name="T23">in conversation</text:span>, <text:span text:style-name="T26">in charity</text:span>, <text:span text:style-name="T27">in spirit</text:span>, <text:span text:style-name="T28">in faith</text:span>, <text:span text:style-name="T29">in purity</text:span>.</text:p>
          </table:table-cell>
        </table:table-row>
      </table:table>
      <text:p text:style-name="P20"/>
      <text:p text:style-name="P22">We could almost make <text:span text:style-name="T30">that</text:span> definition work here. However, it would appear that Paul may be a little senile in his old age because he’s just repeating himself if “in word” is <text:span text:style-name="T31">exactly </text:span>the same as “in conversation”. Note that the Bible does <text:span text:style-name="T31">s</text:span>ometimes <text:span text:style-name="T31">use</text:span> two different words/phrases to describe the same thing and usually <text:span text:style-name="T32">(but not always)</text:span> that’s a new definition <text:span text:style-name="T32">that </text:span>God is <text:span text:style-name="T30">teaching</text:span> us <text:span text:style-name="T33">(</text:span><text:span text:style-name="T34">Gen 1:2</text:span><text:span text:style-name="T35"> “the deep” = “the waters”, </text:span><text:span text:style-name="T36">Gen 1:5</text:span><text:span text:style-name="T37"> “light” = “Day” &amp; “darkness” = “Night”, </text:span><text:span text:style-name="T38">Gen 6:8,9</text:span><text:span text:style-name="T39"> “found grace” = “a just man”</text:span><text:span text:style-name="T33">)</text:span>. <text:span text:style-name="T32">That is not the case in this example.</text:span></text:p>
      <text:p text:style-name="P22"/>
      <table:table table:name="Table4" table:style-name="Table4">
        <table:table-column table:style-name="Table4.A"/>
        <table:table-row>
          <table:table-cell table:style-name="Table4.A1" office:value-type="string">
            <text:p text:style-name="P21"><text:span text:style-name="T6">Hebrews 13:7</text:span><text:line-break/>Remember them which have the rule over you, who have spoken unto you the word of God: whose faith follow, considering the end of their conversation.</text:p>
          </table:table-cell>
        </table:table-row>
      </table:table>
      <text:p text:style-name="P22"/>
      <text:p text:style-name="P23">Speaking of spiritual leaders that God has placed over us, God commands: follow (or copy) their faith, considering the end of their … speech? <text:span text:style-name="T40">We can’t make that wordly definition make sense no matter how hard we try.</text:span></text:p>
      <text:p text:style-name="P23"/>
      <text:p text:style-name="P23"><text:span text:style-name="T41">The very first time any Hebrew or Greek word </text:span><text:span text:style-name="T42">(there are 5) </text:span><text:span text:style-name="T41">appears in the Bible that was translated to “conversation” is:</text:span></text:p>
      <text:p text:style-name="P24"/>
      <table:table table:name="Table5" table:style-name="Table5">
        <table:table-column table:style-name="Table5.A"/>
        <table:table-row>
          <table:table-cell table:style-name="Table5.A1" office:value-type="string">
            <text:p text:style-name="P21"><text:span text:style-name="T6">Genesis 3:24</text:span><text:line-break/>So he drove out the man; and he placed at the east of the garden of Eden Cherubims, and a flaming sword which turned every way, to keep <text:span text:style-name="T23">the way</text:span><text:span text:style-name="T43">H1870</text:span> of the tree of life.</text:p>
          </table:table-cell>
        </table:table-row>
      </table:table>
      <text:p text:style-name="P24"/>
      <text:p text:style-name="P25"><text:span text:style-name="T44">Now think about that carefully </text:span><text:span text:style-name="T45">but on a basic level</text:span><text:span text:style-name="T44">. What </text:span><text:span text:style-name="T46">exactly </text:span><text:span text:style-name="T44">is “the way” to the tree of life in this context? It is a path </text:span><text:span text:style-name="T47">or </text:span><text:span text:style-name="T44">a road. </text:span><text:span text:style-name="T48">If </text:span><text:span text:style-name="T49">we</text:span><text:span text:style-name="T48"> were going on a long journey </text:span><text:span text:style-name="T49">that we were unfamiliar with we</text:span><text:span text:style-name="T48"> </text:span><text:span text:style-name="T49">would</text:span><text:span text:style-name="T48"> first obtain directions on how to get there: that is </text:span><text:span text:style-name="T49">to say, we</text:span><text:span text:style-name="T48"> would want to know </text:span><text:span text:style-name="T50">the way</text:span>. <text:span text:style-name="T51">Therefore, all those things that we would want to know can be </text:span><text:span text:style-name="T52">summed up</text:span><text:span text:style-name="T51"> as: the way.</text:span></text:p>
      <text:p text:style-name="P26"/>
      <text:p text:style-name="P25"><text:span text:style-name="T53">With that in mind, l</text:span><text:span text:style-name="T54">et’s look at the second time that the </text:span><text:span text:style-name="T55">Hebrew word (H1870)</text:span><text:span text:style-name="T54"> </text:span><text:span text:style-name="T55">that was translated to “</text:span><text:span text:style-name="T54">conversation” appear</text:span><text:span text:style-name="T55">s</text:span><text:span text:style-name="T54"> in the Bible that </text:span><text:span text:style-name="T56">is</text:span><text:span text:style-name="T54"> not “the way”:</text:span></text:p>
      <text:p text:style-name="P27"/>
      <table:table table:name="Table6" table:style-name="Table6">
        <table:table-column table:style-name="Table6.A"/>
        <table:table-row>
          <table:table-cell table:style-name="Table6.A1" office:value-type="string">
            <text:p text:style-name="P21"><text:span text:style-name="T6">Genesis 19:31</text:span><text:line-break/>And the firstborn said unto the younger, Our father is old, and there is not a man in the earth to come in <text:span text:style-name="T23">unto us after the manner</text:span><text:span text:style-name="T57">H1870</text:span> of all the earth:</text:p>
          </table:table-cell>
        </table:table-row>
      </table:table>
      <text:list text:style-name="L1">
        <text:list-item>
          <text:p text:style-name="P28">“<text:span text:style-name="T58">the manner”</text:span></text:p>
        </text:list-item>
      </text:list>
      <text:p text:style-name="P27"/>
      <text:p text:style-name="P27"/>
      <text:p text:style-name="P27"/>
      <text:p text:style-name="P27"/>
      <text:p text:style-name="P29"><text:soft-page-break/>And the third that is n<text:span text:style-name="T58">ei</text:span>ther of the first two:</text:p>
      <text:p text:style-name="P29"/>
      <table:table table:name="Table7" table:style-name="Table7">
        <table:table-column table:style-name="Table7.A"/>
        <table:table-row>
          <table:table-cell table:style-name="Table7.A1" office:value-type="string">
            <text:p text:style-name="P21"><text:span text:style-name="T6">Genesis 24:21</text:span><text:line-break/>And the man wondering at her held his peace, to wit whether the LORD had made <text:span text:style-name="T23">his journey</text:span><text:span text:style-name="T59">H1870</text:span> prosperous or not.</text:p>
          </table:table-cell>
        </table:table-row>
      </table:table>
      <text:list text:style-name="L2">
        <text:list-item>
          <text:p text:style-name="P30">“<text:span text:style-name="T60">journey”</text:span></text:p>
        </text:list-item>
      </text:list>
      <text:p text:style-name="P29"/>
      <text:p text:style-name="P29">A fuller picture should already be forming in your mind. Not only does “conversation” encompass “the <text:span text:style-name="T61">way</text:span>” <text:span text:style-name="T61">or</text:span> “the <text:span text:style-name="T61">manner”</text:span>, but it also includes “<text:span text:style-name="T62">the journey” which is </text:span><text:span text:style-name="T63">not only the</text:span><text:span text:style-name="T62"> series of actions </text:span><text:span text:style-name="T63">to traverse a path but also </text:span><text:span text:style-name="T64">everything that happens along the way</text:span><text:span text:style-name="T62">.</text:span></text:p>
      <text:p text:style-name="P29"/>
      <table:table table:name="Table8" table:style-name="Table8">
        <table:table-column table:style-name="Table8.A"/>
        <table:table-row>
          <table:table-cell table:style-name="Table8.A1" office:value-type="string">
            <text:p text:style-name="P21"><text:span text:style-name="T6">Genesis 31:35</text:span><text:line-break/>And she said to her father, Let it not displease my lord that I cannot rise up before thee<text:span text:style-name="T23">; for the custom</text:span><text:span text:style-name="T65">H1870</text:span> of women is upon me. And he searched, but found not the images.</text:p>
          </table:table-cell>
        </table:table-row>
      </table:table>
      <text:list text:style-name="L3">
        <text:list-item>
          <text:p text:style-name="P31">“<text:span text:style-name="T66">the custom”</text:span></text:p>
        </text:list-item>
      </text:list>
      <text:p text:style-name="P29"/>
      <table:table table:name="Table9" table:style-name="Table9">
        <table:table-column table:style-name="Table9.A"/>
        <table:table-row>
          <table:table-cell table:style-name="Table9.A1" office:value-type="string">
            <text:p text:style-name="P21"><text:span text:style-name="T6">Numbers 22:32</text:span><text:line-break/>And the angel of the LORD said unto him, Wherefore hast thou smitten thine ass these three times? behold, I went out to withstand <text:span text:style-name="T23">thee, because thy way</text:span><text:span text:style-name="T67">H1870</text:span> is perverse before me:</text:p>
          </table:table-cell>
        </table:table-row>
      </table:table>
      <text:p text:style-name="P29"/>
      <text:p text:style-name="P32"><text:span text:style-name="T68">Was the angel of the LORD displeased </text:span><text:span text:style-name="T69">at the </text:span><text:span text:style-name="T68">path through the vineyards </text:span><text:span text:style-name="T69">that Balaam chose</text:span><text:span text:style-name="T68">? No, of course not. He was displeased with Balaam</text:span><text:span text:style-name="T70"> </text:span><text:span text:style-name="T71">because of</text:span><text:span text:style-name="T72"> his </text:span><text:span text:style-name="T73">actions</text:span>.</text:p>
      <text:p text:style-name="P32"/>
      <table:table table:name="Table10" table:style-name="Table10">
        <table:table-column table:style-name="Table10.A"/>
        <table:table-row>
          <table:table-cell table:style-name="Table10.A1" office:value-type="string">
            <text:p text:style-name="P33"><text:span text:style-name="T6">1 Kings 8:44</text:span><text:line-break/>If thy people go out to battle against their enemy, <text:span text:style-name="T23">whithersoever</text:span><text:span text:style-name="T74">H1870</text:span> thou shalt send them, and shall pray unto the LORD <text:span text:style-name="T23">toward</text:span><text:span text:style-name="T74">H1870</text:span> the city which thou hast chosen, and toward the house that I have built for thy name:</text:p>
          </table:table-cell>
        </table:table-row>
      </table:table>
      <text:list text:style-name="L4">
        <text:list-item>
          <text:p text:style-name="P34">Whithersoever <text:span text:style-name="T75">(t</text:span>o whatever place<text:span text:style-name="T75">)</text:span></text:p>
        </text:list-item>
        <text:list-item>
          <text:p text:style-name="P34">Toward <text:span text:style-name="T75">(a</text:span> direction<text:span text:style-name="T75">)</text:span></text:p>
        </text:list-item>
      </text:list>
      <text:p text:style-name="P35"/>
      <text:p text:style-name="P36">And then we come to the first time that “conversation” appears from H1870:</text:p>
      <text:p text:style-name="P36"/>
      <table:table table:name="Table11" table:style-name="Table11">
        <table:table-column table:style-name="Table11.A"/>
        <table:table-row>
          <table:table-cell table:style-name="Table11.A1" office:value-type="string">
            <text:p text:style-name="P33"><text:span text:style-name="T6">Psalms 37:14</text:span><text:line-break/>The wicked have drawn out the sword, and have bent their bow, to cast down the poor and needy, and to slay such as be of upright <text:span text:style-name="T23">conversation</text:span><text:span text:style-name="T76">H1870</text:span>.</text:p>
          </table:table-cell>
        </table:table-row>
      </table:table>
      <text:p text:style-name="P35"/>
      <text:p text:style-name="P37">If you take all the ideas that we’ve gathered from God’s word and put them together God’s definition of “conversation” <text:span text:style-name="T77">emerges. </text:span><text:span text:style-name="T78">And then when you take His definition </text:span><text:span text:style-name="T79">you will gain understanding (</text:span><text:span text:style-name="T80">Pro 3:13</text:span><text:span text:style-name="T79">)</text:span><text:span text:style-name="T78">:</text:span></text:p>
      <text:p text:style-name="P37"/>
      <table:table table:name="Table12" table:style-name="Table12" table:template-name="default">
        <table:table-column table:style-name="Table12.A"/>
        <table:table-row table:style-name="Table12.1">
          <table:table-cell table:style-name="Table12.A1" office:value-type="string">
            <text:p text:style-name="P38">Psalms 50:23</text:p>
            <text:p text:style-name="P38">Whoso offereth praise glorifieth me: and to him that <text:span text:style-name="T23">ordereth</text:span> <text:span text:style-name="T26">his conversation</text:span> <text:span text:style-name="T27">aright</text:span> will I shew the salvation of God.</text:p>
          </table:table-cell>
        </table:table-row>
        <table:table-row table:style-name="Table12.1">
          <table:table-cell table:style-name="Table12.A2" office:value-type="string">
            <text:p text:style-name="P39">Ephesians 4:22-25</text:p>
            <text:p text:style-name="P39"><text:span text:style-name="T81">22</text:span> That ye <text:span text:style-name="T27">put off</text:span> concerning the former <text:span text:style-name="T23">conversation</text:span> the old man, which is corrupt according to the deceitful lusts;</text:p>
          </table:table-cell>
        </table:table-row>
      </table:table>
      <text:p text:style-name="P40"/>
      <text:p text:style-name="P41">Be sure to also go back and review <text:span text:style-name="T6">1 Timothy 4:12</text:span>, and <text:span text:style-name="T6">Hebrews 13:7</text:span>.</text:p>
      <text:p text:style-name="P42"/>
      <table:table table:name="Table13" table:style-name="Table13">
        <table:table-column table:style-name="Table13.A"/>
        <table:table-row>
          <table:table-cell table:style-name="Table13.A1" office:value-type="string">
            <text:p text:style-name="P43">Noah Websters 1828 dictionary</text:p>
            <text:p text:style-name="P33"><text:span text:style-name="T1">CONVERSATION</text:span>, n. </text:p>
            <text:p text:style-name="P44"><text:span text:style-name="T1">1</text:span>. General course of manners; behavior; deportment; especially as it respects morals.</text:p>
            <text:p text:style-name="P44"><text:s text:c="4"/>Let your conversation be as becometh the gospel. <text:span text:style-name="T6">Phil 1</text:span>. </text:p>
            <text:p text:style-name="P33"><text:s text:c="4"/>Be ye holy in all manner of conversation. <text:span text:style-name="T6">1 Pet 1</text:span>. </text:p>
            <text:p text:style-name="P45"><text:span text:style-name="T1">2</text:span>. A keeping company; familiar intercourse; intimate fellowship or association; commerce in social life.</text:p>
            <text:p text:style-name="P45"><text:s text:c="4"/>Knowledge of men and manners is best acquired by conversation with the best company.</text:p>
            <text:p text:style-name="P33"><text:span text:style-name="T1">3</text:span>. Intimate and familiar acquaintance; as a conversation with books, or other object.</text:p>
            <text:p text:style-name="P46"><text:span text:style-name="T1">4</text:span>. Familiar discourse; general intercourse of sentiments; chat; unrestrained talk; opposed to a formal conference.</text:p>
            <text:p text:style-name="P46"><text:s text:c="4"/>What I mentioned in conversation was not a new thought.</text:p>
            <text:p text:style-name="P33"><text:s text:c="4"/>[This is now the most general use of the word.] </text:p>
          </table:table-cell>
        </table:table-row>
      </table:table>
      <text:list text:style-name="L5">
        <text:list-item>
          <text:p text:style-name="P47">Notice the scripture references in the <text:span text:style-name="T82">first </text:span>definition?</text:p>
        </text:list-item>
        <text:list-item>
          <text:p text:style-name="P47">Can we find <text:span text:style-name="T82">any scripture references</text:span> in <text:span text:style-name="T82">any</text:span> “modern” dictionar<text:span text:style-name="T82">y</text:span>? <text:span text:style-name="T83">Could it be because they have forsaken God? </text:span><text:span text:style-name="T84">Proverbs 28:4</text:span><text:span text:style-name="T85">.</text:span></text:p>
        </text:list-item>
      </text:list>
      <text:p text:style-name="P48"/>
      <text:p text:style-name="P49"><text:soft-page-break/><text:span text:style-name="T86">Communicate</text:span></text:p>
      <text:p text:style-name="P48"/>
      <table:table table:name="Table14" table:style-name="Table14">
        <table:table-column table:style-name="Table14.A"/>
        <table:table-row>
          <table:table-cell table:style-name="Table14.A1" office:value-type="string">
            <text:p text:style-name="P50">Merriam-Webster</text:p>
            <text:p text:style-name="P51"><text:span text:style-name="T1">communicate</text:span> (verb)</text:p>
            <text:p text:style-name="P51">1 (a): to convey knowledge of or information about: make known</text:p>
            <text:p text:style-name="P51"><text:s text:c="3"/>(b): to reveal by clear signs</text:p>
            <text:p text:style-name="P51">2: to cause to pass from one to another</text:p>
            <text:p text:style-name="P51">3: archaic: share</text:p>
            <text:p text:style-name="P51"><text:span text:style-name="T1">communicate</text:span> (intransitive-verb)</text:p>
            <text:p text:style-name="P51">1: to transmit information, thought, or feeling so that it is satisfactorily received or understood</text:p>
            <text:p text:style-name="P51">2: to open into each other: connect</text:p>
            <text:p text:style-name="P51">3: to receive Communion</text:p>
          </table:table-cell>
        </table:table-row>
        <table:table-row>
          <table:table-cell table:style-name="Table14.A2" office:value-type="string">
            <text:p text:style-name="P52">Cambridge</text:p>
            <text:p text:style-name="P53"><text:span text:style-name="T1">communicate</text:span> (verb)</text:p>
            <text:p text:style-name="P54">1. to share information with others by speaking, writing, moving your body, or using other signals.</text:p>
            <text:p text:style-name="P54">2. <text:span text:style-name="T87">to talk about your thoughts and feelings, and help other people to understand them</text:span></text:p>
            <text:p text:style-name="P55">3. <text:span text:style-name="T88">to pass a disease from one person or animal to another</text:span></text:p>
            <text:p text:style-name="P56">4: <text:span text:style-name="T89">If one room communicates with another, it connects with it through a door</text:span></text:p>
            <text:p text:style-name="P57">5: <text:span text:style-name="T90">to give messages or information to others through speech, writing, body movements, or signals</text:span></text:p>
            <text:p text:style-name="P58">6. If two people communicate with each other, they are able to understand each other and have a satisfactory relationship</text:p>
          </table:table-cell>
        </table:table-row>
      </table:table>
      <text:p text:style-name="P59"/>
      <table:table table:name="Table15" table:style-name="Table15">
        <table:table-column table:style-name="Table15.A"/>
        <table:table-row>
          <table:table-cell table:style-name="Table15.A1" office:value-type="string">
            <text:p text:style-name="P33"><text:span text:style-name="T6">Galatians 2:2</text:span><text:line-break/>And I went up by revelation, and <text:span text:style-name="T23">communicated</text:span> unto them <text:span text:style-name="T26">that gospel</text:span> which I <text:span text:style-name="T27">preach</text:span> among the Gentiles, but privately to them which were of reputation, lest by any means I should run, or had run, in vain.</text:p>
          </table:table-cell>
        </table:table-row>
      </table:table>
      <text:list text:style-name="L6">
        <text:list-item>
          <text:p text:style-name="P60">What was communicated? That gospel.</text:p>
        </text:list-item>
        <text:list-item>
          <text:p text:style-name="P61">Who was it communicated to? The Gentiles (<text:span text:style-name="T91">all peoples that are not Jewish</text:span>).</text:p>
        </text:list-item>
        <text:list-item>
          <text:p text:style-name="P60">How was i<text:span text:style-name="T92">t</text:span> communicated? He preached (spoke).</text:p>
        </text:list-item>
      </text:list>
      <text:p text:style-name="P59"/>
      <text:p text:style-name="P62">So far, so good, right? <text:span text:style-name="T93">Now, t</text:span>ry <text:span text:style-name="T94">these</text:span>:</text:p>
      <text:p text:style-name="P62"/>
      <table:table table:name="Table16" table:style-name="Table16" table:template-name="default">
        <table:table-column table:style-name="Table16.A"/>
        <table:table-row>
          <table:table-cell table:style-name="Table16.A1" office:value-type="string">
            <text:p text:style-name="P63"><text:span text:style-name="T6">Philippians 4:14</text:span><text:line-break/>Notwithstanding ye have well done, that ye did communicate <text:span text:style-name="T23">with</text:span> my affliction.</text:p>
          </table:table-cell>
        </table:table-row>
        <table:table-row table:style-name="Table16.2">
          <table:table-cell table:style-name="Table16.A2" office:value-type="string">
            <text:p text:style-name="P63"><text:span text:style-name="T6">Philippians 4:15</text:span><text:line-break/>Now ye Philippians know also, that in the beginning of the gospel, when I departed from Macedonia, no church communicated with me <text:span text:style-name="T23">as concerning giving and receiving</text:span>, but ye only.</text:p>
          </table:table-cell>
        </table:table-row>
      </table:table>
      <text:p text:style-name="P62"/>
      <text:p text:style-name="P64">If we try to use any of the definitions we were given then Paul is saying that the Philippians <text:span text:style-name="T12">spoke</text:span><text:span text:style-name="T13"> </text:span><text:span text:style-name="T95">with/</text:span><text:span text:style-name="T13">to his afflictions. </text:span><text:span text:style-name="T96">Afflictions don’t have ears to hear.</text:span><text:span text:style-name="T13"> </text:span><text:span text:style-name="T97">In the second verse, what does speaking to one another have to do with giving and receiving? Do you think the Philippians are being commended for only </text:span><text:span text:style-name="T98">speaking</text:span><text:span text:style-name="T97"> towards giving to Paul’</text:span><text:span text:style-name="T99">s needs</text:span><text:span text:style-name="T97">? What </text:span><text:span text:style-name="T100">profit</text:span><text:span text:style-name="T97"> would that </text:span><text:span text:style-name="T101">be</text:span><text:span text:style-name="T97">? </text:span><text:span text:style-name="T100">Absolutely none:</text:span><text:span text:style-name="T97"> </text:span><text:span text:style-name="T102">James 2:15,16</text:span><text:span text:style-name="T103">, </text:span><text:span text:style-name="T102">1 John 3:17</text:span><text:span text:style-name="T103">. </text:span><text:span text:style-name="T100">Moreover</text:span><text:span text:style-name="T104">, acknowledging someone’s need and then not providing it (when you can) shows that one does not </text:span><text:span text:style-name="T105">have</text:span><text:span text:style-name="T104"> the love of God in them. </text:span><text:span text:style-name="T106">None of the definitions we were given make any sense and worse yet they leave us confused – of which God is not the author (</text:span><text:span text:style-name="T107">1Cor 14:33</text:span><text:span text:style-name="T106">). </text:span><text:span text:style-name="T108">S</text:span><text:span text:style-name="T106">o, who is the author of lies and the confusion that results from </text:span><text:span text:style-name="T109">them</text:span><text:span text:style-name="T106">? </text:span><text:span text:style-name="T108">The father of lies himself:</text:span></text:p>
      <text:p text:style-name="P65"/>
      <table:table table:name="Table17" table:style-name="Table17">
        <table:table-column table:style-name="Table17.A"/>
        <table:table-row>
          <table:table-cell table:style-name="Table17.A1" office:value-type="string">
            <text:p text:style-name="P33"><text:span text:style-name="T6">John 8:44</text:span><text:line-break/><text:span text:style-name="T110">Ye are of your father </text:span><text:span text:style-name="T111">the devil</text:span><text:span text:style-name="T110">, and the lusts of your father ye will do. He was a murderer from the beginning, and abode not in the truth, because there is no truth in him. When he speaketh a lie, he speaketh of his own: for </text:span><text:span text:style-name="T111">he is a liar, and the father of it</text:span><text:span text:style-name="T110">.</text:span></text:p>
          </table:table-cell>
        </table:table-row>
      </table:table>
      <text:p text:style-name="P66"/>
      <text:p text:style-name="P66">Communicate does not appear in the old testament and so there are only Greek <text:span text:style-name="T112">S</text:span>trong’<text:span text:style-name="T112">s </text:span>numbers for it: G2841, G2842, and G2843. <text:span text:style-name="T113">Here is a summary of them:</text:span></text:p>
      <text:p text:style-name="P66"/>
      <table:table table:name="Table18" table:style-name="Table18" table:template-name="default">
        <table:table-column table:style-name="Table18.A"/>
        <table:table-column table:style-name="Table18.B"/>
        <table:table-row>
          <table:table-cell table:style-name="Table18.A1" office:value-type="string">
            <text:p text:style-name="P67">Acts 2:42</text:p>
          </table:table-cell>
          <table:table-cell table:style-name="Table18.B1" office:value-type="string">
            <text:p text:style-name="P68"><text:span text:style-name="T114">F</text:span>ellowship</text:p>
          </table:table-cell>
        </table:table-row>
        <table:table-row table:style-name="Table18.2">
          <table:table-cell table:style-name="Table18.A2" office:value-type="string">
            <text:p text:style-name="P67">Romans 12:13</text:p>
          </table:table-cell>
          <table:table-cell table:style-name="Table18.B2" office:value-type="string">
            <text:p text:style-name="P68">Distributing</text:p>
          </table:table-cell>
        </table:table-row>
        <table:table-row>
          <table:table-cell table:style-name="Table18.A2" office:value-type="string">
            <text:p text:style-name="P68"><text:span text:style-name="T6">Romans 15:26,27</text:span>, <text:span text:style-name="T115">1 Ti</text:span><text:span text:style-name="T116">mothy</text:span><text:span text:style-name="T115"> 5:22</text:span><text:span text:style-name="T117">, </text:span><text:span text:style-name="T115">1 Pe</text:span><text:span text:style-name="T116">ter</text:span><text:span text:style-name="T115"> 4:13</text:span></text:p>
          </table:table-cell>
          <table:table-cell table:style-name="Table18.B2" office:value-type="string">
            <text:p text:style-name="P68">Contribution, <text:span text:style-name="T117">partaker(s)</text:span></text:p>
          </table:table-cell>
        </table:table-row>
        <table:table-row>
          <table:table-cell table:style-name="Table18.A2" office:value-type="string">
            <text:p text:style-name="P69"><text:span text:style-name="T6">1 Cor</text:span><text:span text:style-name="T116">inthians</text:span><text:span text:style-name="T6"> 10:16</text:span> (2x), <text:span text:style-name="T6">2 Cor</text:span><text:span text:style-name="T116">inthians</text:span><text:span text:style-name="T6"> 6:14</text:span></text:p>
          </table:table-cell>
          <table:table-cell table:style-name="Table18.B2" office:value-type="string">
            <text:p text:style-name="P69">Communion</text:p>
          </table:table-cell>
        </table:table-row>
      </table:table>
      <text:p text:style-name="P70"/>
      <text:p text:style-name="P70">Do any of those words in the right column make more sense when used as a definition for communicate in <text:span text:style-name="T6">Phil</text:span><text:span text:style-name="T118">ippians</text:span><text:span text:style-name="T6"> 4:14,15</text:span>? <text:span text:style-name="T119">Of course they do, because we’re </text:span><text:span text:style-name="T120">using God’s word to define God’s word</text:span><text:span text:style-name="T119">!</text:span></text:p>
      <table:table table:name="Table19" table:style-name="Table19">
        <table:table-column table:style-name="Table19.A"/>
        <text:soft-page-break/>
        <table:table-row>
          <table:table-cell table:style-name="Table19.A1" office:value-type="string">
            <text:p text:style-name="P71">Noah Webster’s 1828 dictionary</text:p>
            <text:p text:style-name="P72"><text:span text:style-name="T1">COMMUNICATE</text:span>, v<text:span text:style-name="T121">erb transitive</text:span></text:p>
            <text:p text:style-name="P33"><text:span text:style-name="T1">1</text:span>. To impart; to give to another, as a partaker; to confer for joint possession; to bestow, as that which the receiver is to hold, retain, use or enjoy; with to.</text:p>
            <text:p text:style-name="P33"><text:s text:c="4"/>Where God is worshiped, there he communicates his blessings and holy influences.</text:p>
            <text:p text:style-name="P33"><text:s text:c="4"/>Let him that is taught in the word communicate to him that teacheth in all good things. <text:span text:style-name="T6">Gal 6</text:span>.</text:p>
            <text:p text:style-name="P33"><text:span text:style-name="T1">2</text:span>. To impart reciprocally, or mutually; to have or enjoy a share of; followed by with.</text:p>
            <text:p text:style-name="P33"><text:s text:c="4"/>Common benefits are to be communicated with all, but peculiar benefits with choice.</text:p>
            <text:p text:style-name="P33"><text:s text:c="4"/>But Diamede desires my company, <text:span text:style-name="T122">a</text:span>nd still communicates his praise with me.</text:p>
            <text:p text:style-name="P33"><text:span text:style-name="T1">3</text:span>. To impart, as knowledge; to reveal; to give, as information, either by words, signs or signals; as, to communicate intelligence, news, opinions, or facts.</text:p>
            <text:p text:style-name="P73"><text:s text:c="4"/>Formerly this verb had <text:span text:style-name="T12">with</text:span> before the person receiving; as, he communicated those thoughts only <text:span text:style-name="T12">with</text:span></text:p>
            <text:p text:style-name="P73"><text:s text:c="4"/>the Lord Digby. Clarendon. But now it has to only.</text:p>
            <text:p text:style-name="P33"><text:span text:style-name="T1">4</text:span>. To deliver, as to communicate a message; to give, as to communicate motion.</text:p>
            <text:p text:style-name="P33"/>
            <text:p text:style-name="P33"><text:span text:style-name="T1">COMMUNICATE</text:span>, v<text:span text:style-name="T121">erb intransitive</text:span></text:p>
            <text:p text:style-name="P33"><text:span text:style-name="T1">1</text:span>. To partake of the Lords supper. Instead of this, in America, at least in New England, commune is generally or always used.</text:p>
            <text:p text:style-name="P33"><text:span text:style-name="T1">2</text:span>. To have a communication or passage from one to another; to have the means of passing from one to another; as, two houses communicate with each other; a fortress communicates with the country; the canals of the body communicate with each other.</text:p>
            <text:p text:style-name="P33"><text:span text:style-name="T1">3</text:span>. To have intercourse; applied to persons.</text:p>
            <text:p text:style-name="P74"><text:span text:style-name="T1">4</text:span>. To have, enjoy or suffer reciprocally; to have a share with another.</text:p>
            <text:p text:style-name="P74"><text:s text:c="4"/>Ye have done well that ye did communicate with my affliction. <text:span text:style-name="T6">Phil 4</text:span>. </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octor(s)</text:p>
      <text:p text:style-name="P77"/>
      <text:p text:style-name="P77">The word “doctor(s)” appears 3 times in the Bible.</text:p>
      <text:p text:style-name="P77"/>
      <table:table table:name="Table20" table:style-name="Table20" table:template-name="default">
        <table:table-column table:style-name="Table20.A"/>
        <table:table-row>
          <table:table-cell table:style-name="Table20.A1" office:value-type="string">
            <text:p text:style-name="P63"><text:span text:style-name="T6">Luke 2:46</text:span><text:line-break/>And it came to pass, that after three days they found him in the temple, sitting in the midst of the <text:span text:style-name="T23">doctors</text:span>, both hearing them, and asking them questions.</text:p>
          </table:table-cell>
        </table:table-row>
        <table:table-row table:style-name="Table20.2">
          <table:table-cell table:style-name="Table20.A2" office:value-type="string">
            <text:p text:style-name="P63"><text:span text:style-name="T6">Luke 5:17</text:span><text:line-break/>And it came to pass on a certain day, as he was teaching, that there were Pharisees and <text:span text:style-name="T23">doctors</text:span> of the law sitting by, which were come out of every town of Galilee, and Judaea, and Jerusalem: and the power of the Lord was present to heal them.</text:p>
          </table:table-cell>
        </table:table-row>
        <table:table-row>
          <table:table-cell table:style-name="Table20.A2" office:value-type="string">
            <text:p text:style-name="P63"><text:span text:style-name="T6">Acts 5:34</text:span><text:line-break/>Then stood there up one in the council, a Pharisee, named Gamaliel, a <text:span text:style-name="T23">doctor</text:span> of the law, had in reputation among all the people, and commanded to put the apostles forth a little space;</text:p>
          </table:table-cell>
        </table:table-row>
      </table:table>
      <text:p text:style-name="P75"/>
      <text:p text:style-name="P78">The examples are all nouns so we’ll focus on nouns in the definitions as well.</text:p>
      <text:p text:style-name="P78"/>
      <table:table table:name="Table21" table:style-name="Table21">
        <table:table-column table:style-name="Table21.A"/>
        <table:table-row>
          <table:table-cell table:style-name="Table21.A1" office:value-type="string">
            <text:p text:style-name="P79">Merriam-Webster</text:p>
            <text:p text:style-name="P33"><text:span text:style-name="T1">doctor</text:span> <text:span text:style-name="T123">(noun)</text:span></text:p>
            <text:p text:style-name="P33">1 a: Christianity : an eminent theologian <text:span text:style-name="T23">declared</text:span> a sound expounder of doctrine by the Roman Catholic Church</text:p>
            <text:p text:style-name="P33"><text:s text:c="3"/>b: a learned or authoritative teacher</text:p>
            <text:p text:style-name="P33"><text:s text:c="3"/>c: a person who has earned one of the highest academic degrees (such as a PhD) conferred by a university</text:p>
            <text:p text:style-name="P33"><text:s text:c="3"/>d: a person awarded an honorary doctorate (such as an LLD or Litt D) by a college or university</text:p>
            <text:p text:style-name="P33">2 a: a person skilled or specializing in healing arts</text:p>
            <text:p text:style-name="P33"><text:s text:c="3"/>b: medicine man</text:p>
            <text:p text:style-name="P33">3 a: material added (as to food) to produce a desired effect</text:p>
            <text:p text:style-name="P33"><text:s text:c="3"/>b: a blade (as of metal) for spreading a coating or scraping a surface</text:p>
            <text:p text:style-name="P33">4: a person who restores, repairs, or fine-tunes things</text:p>
          </table:table-cell>
        </table:table-row>
        <table:table-row>
          <table:table-cell table:style-name="Table21.A2" office:value-type="string">
            <text:p text:style-name="P80">Cambridge</text:p>
            <text:p text:style-name="P81">doctor<text:span text:style-name="T5"> (noun)</text:span></text:p>
            <text:p text:style-name="P82">1. a person with a medical degree whose job is to treat people who are sick or hurt:</text:p>
            <text:p text:style-name="P82">2. a person who has the highest degree (= qualification) from a college or university</text:p>
          </table:table-cell>
        </table:table-row>
      </table:table>
      <text:p text:style-name="P75"/>
      <text:p text:style-name="P83">According to Merriam-Webster, you can’t be a doctor in Christianity unless the Roman Catholic church says so. <text:span text:style-name="T124">And that’s the only theologically based definition we are given. If we use any of the other definitions we would quickly arrive at error.</text:span></text:p>
      <text:p text:style-name="P83"/>
      <text:p text:style-name="P84">And yet in God’s word we see doctors in the synagogue when Jesus was a young lad. <text:span text:style-name="T125">W</text:span>e see them with the Pharisees that came out of Galilee and we <text:span text:style-name="T126">also see </text:span><text:span text:style-name="T127">at least one</text:span><text:span text:style-name="T126"> on the council (the Jewish high court, also known as the Sanhedrin).</text:span></text:p>
      <text:p text:style-name="P84"/>
      <text:p text:style-name="P84"><text:span text:style-name="T128">And a</text:span><text:span text:style-name="T126">ll of that roughly 350 years before the Roman Catholic church even existed.</text:span></text:p>
      <text:p text:style-name="P85"/>
      <text:p text:style-name="P86">The definition of doctor as used in God’s word, and defined by God’s word is (G1320): master(s), teacher(s). <text:span text:style-name="T129">And by extension “Rabbi”</text:span> <text:span text:style-name="T130">(</text:span><text:span text:style-name="T131">Mat 23:8</text:span><text:span text:style-name="T130">).</text:span></text:p>
      <text:p text:style-name="P86"/>
      <text:p text:style-name="P87">Let’s see what Noah Websters 1828 <text:span text:style-name="T132">dictionary </text:span>has to say.</text:p>
      <text:p text:style-name="P88"/>
      <table:table table:name="Table22" table:style-name="Table22">
        <table:table-column table:style-name="Table22.A"/>
        <table:table-row>
          <table:table-cell table:style-name="Table22.A1" office:value-type="string">
            <text:p text:style-name="P89">Noah Websters 1828</text:p>
            <text:p text:style-name="P90"><text:span text:style-name="T1">DOCTOR</text:span>, n. [L., to teach.]</text:p>
            <text:p text:style-name="P33">1. A teacher.</text:p>
            <text:p text:style-name="P33"><text:s text:c="4"/>There stood up one in the council, a Pharisee, named Gamaliel, a doctor of the law. <text:span text:style-name="T6">Acts 5</text:span>.</text:p>
            <text:p text:style-name="P33">2. One who has passed all the degrees of a faculty, and is empowered to practice and teach it, as a doctor in divinity, in physic, in law; or according to modern usage, a person who has received the highest degree in a faculty. The degree of doctor is conferred by universities and colleges, as an honorary mark of literary distinction. It is also conferred on physicians, as a professional degree.</text:p>
            <text:p text:style-name="P33">3. A learned man; a man skilled in a profession; a man of erudition.</text:p>
            <text:p text:style-name="P33">4. A physician; one whose occupation is to cure diseases.</text:p>
            <text:p text:style-name="P33">5. The title, doctor, is given to certain <text:span text:style-name="T23">fathers of the church</text:span> whose opinions are received as authorities, and in the Greek church, it is given to a particular officer who interprets the scriptures.</text:p>
            <text:p text:style-name="P33">Doctors Commons, the college of civilians in London.</text:p>
          </table:table-cell>
        </table:table-row>
      </table:table>
      <text:p text:style-name="P86"/>
      <text:p text:style-name="P86"/>
      <text:p text:style-name="P87"><text:soft-page-break/>Wow. We have to be very careful with this one. Can you spot the sin in this definition? Here’s some guidance from <text:span text:style-name="T133">the</text:span><text:span text:style-name="T134"> Master </text:span>Jesus:</text:p>
      <text:p text:style-name="P86"/>
      <table:table table:name="Table23" table:style-name="Table23">
        <table:table-column table:style-name="Table23.A"/>
        <table:table-row>
          <table:table-cell table:style-name="Table23.A1" office:value-type="string">
            <text:p text:style-name="P91">Matthew 23:<text:span text:style-name="T129">8,</text:span>9</text:p>
            <text:p text:style-name="Table_20_Contents"><text:span text:style-name="T81">8</text:span> <text:span text:style-name="T110">But be not ye called Rabbi: for one is your Master, even Christ; and all ye are brethren.</text:span></text:p>
            <text:p text:style-name="P92"><text:span text:style-name="T81">9</text:span> <text:span text:style-name="T110">And </text:span><text:span text:style-name="T111">call no man your father upon the earth</text:span><text:span text:style-name="T110">: for one is your Father, which is in heaven.</text:span></text:p>
          </table:table-cell>
        </table:table-row>
      </table:table>
      <text:list text:style-name="L7">
        <text:list-item>
          <text:p text:style-name="P93">Rabbi means master (<text:span text:style-name="T6">John 1:38</text:span>).</text:p>
        </text:list-item>
        <text:list-item>
          <text:p text:style-name="P94">Calling spiritual leaders “father” <text:span text:style-name="T135">or “master” </text:span>is sin.</text:p>
          <text:list>
            <text:list-item>
              <text:p text:style-name="P94"><text:span text:style-name="T136">S</text:span><text:span text:style-name="T137">pecifically, </text:span><text:span text:style-name="T136">it’s </text:span><text:span text:style-name="T137">idolatry: when we put anything above God: </text:span><text:span text:style-name="T138">Exod</text:span><text:span text:style-name="T139">us</text:span><text:span text:style-name="T138"> 20:3-6</text:span></text:p>
            </text:list-item>
          </text:list>
        </text:list-item>
      </text:list>
      <text:p text:style-name="P95"/>
      <table:table table:name="Table24" table:style-name="Table24">
        <table:table-column table:style-name="Table24.A"/>
        <table:table-row>
          <table:table-cell table:style-name="Table24.A1" office:value-type="string">
            <text:p text:style-name="P33"><text:span text:style-name="T6">Job 32:21-22</text:span><text:line-break/><text:span text:style-name="T81">21</text:span> Let me not, I pray you, accept any man's person, <text:span text:style-name="T140">neither let me give flattering titles unto man</text:span>.<text:line-break/><text:span text:style-name="T81">22</text:span> For I know not to give flattering titles; <text:span text:style-name="T141">in so doing my maker would soon take me away</text:span>.</text:p>
          </table:table-cell>
        </table:table-row>
      </table:table>
      <text:list text:style-name="L8">
        <text:list-item>
          <text:p text:style-name="P96">Elihu knew the consequences of <text:span text:style-name="T142">idolatry</text:span> <text:span text:style-name="T143">and avoided</text:span> it <text:span text:style-name="T143">as we should too</text:span>: <text:span text:style-name="T6">Romans 6:23</text:span>.</text:p>
        </text:list-item>
      </text:list>
      <text:p text:style-name="P97"/>
      <text:p text:style-name="P97"/>
      <text:p text:style-name="P98">So, hopefully with all that you’ve learned a little more about why it’s so important to not use the world’s definitions for words but instead use the Bible to define itself.</text:p>
      <text:p text:style-name="P98"/>
      <text:p text:style-name="P99"><text:span text:style-name="T144">How exactly you go about doing that is a matter between you and </text:span><text:span text:style-name="T145">God</text:span><text:span text:style-name="T144"> (</text:span><text:span text:style-name="T146">John 16:13</text:span>, <text:span text:style-name="T147">1 John 5:7</text:span><text:span text:style-name="T144">). </text:span><text:span text:style-name="T148">But, also m</text:span><text:span text:style-name="T144">ake sure (</text:span><text:span text:style-name="T146">1Thess 5:21</text:span><text:span text:style-name="T144">) </text:span><text:span text:style-name="T148">that the word</text:span><text:span text:style-name="T144"> definitions </text:span><text:span text:style-name="T148">that you are using </text:span><text:span text:style-name="T144">are coming from the most reliable source: God.</text:span></text:p>
      <text:p text:style-name="P100"/>
      <text:p text:style-name="P100"/>
      <text:p text:style-name="P100"/>
      <text:p text:style-name="P101">I’ll leave you with one final example that we all know well. It’s a great example of how twisted t<text:span text:style-name="T149">he world is.</text:span></text:p>
      <text:p text:style-name="P101"/>
      <table:table table:name="Table25" table:style-name="Table25">
        <table:table-column table:style-name="Table25.A"/>
        <table:table-row>
          <table:table-cell table:style-name="Table25.A1" office:value-type="string">
            <text:p text:style-name="P33"><text:span text:style-name="T6">James 2:3</text:span><text:line-break/>And ye have respect to him that weareth the <text:span text:style-name="T140">gay</text:span> clothing, and say unto him, Sit thou here in a good place; and say to the poor, Stand thou there, or sit here under my footstool:</text:p>
          </table:table-cell>
        </table:table-row>
      </table:table>
      <text:p text:style-name="P101"/>
      <text:p text:style-name="P101">The worlds definition: sodomy <text:span text:style-name="T150">or the association with it</text:span> (<text:span text:style-name="T6">Leviticus 20:13</text:span>). <text:span text:style-name="T151">James 1:27</text:span><text:span text:style-name="T152"> “...keep himself unspotted from the world.”</text:span></text:p>
      <text:p text:style-name="P101"/>
      <text:p text:style-name="P101">God’s definition <text:span text:style-name="T153">(G2986)</text:span>: <text:span text:style-name="T154">gorgeous, bright, goodly, white, clear.</text:span></text:p>
      <text:p text:style-name="P101"/>
      <text:p text:style-name="P101"/>
      <text:p text:style-name="P101"/>
      <text:p text:style-name="P101"/>
      <text:p text:style-name="P102">Little<text:span text:style-name="T155"> children, keep yourselves from idol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abriela Nerd Font" svg:font-family="'Gabriela Nerd Font'"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default.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2"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5"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6"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7"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8"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9"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0"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2"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5"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6"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default" table:first-row-end-column="row" table:first-row-start-column="row" table:last-row-end-column="row" table:last-row-start-column="row">
      <table:first-row table:style-name="default.1"/>
      <table:last-row table:style-name="default.2"/>
      <table:first-column table:style-name="default.3"/>
      <table:last-column table:style-name="default.4"/>
      <table:body table:style-name="default.9"/>
      <table:even-rows table:style-name="default.5"/>
      <table:odd-rows table:style-name="default.6"/>
      <table:even-columns table:style-name="default.7"/>
      <table:odd-columns table:style-name="default.8"/>
      <table:background table:style-name="default.10"/>
      <loext:first-row-even-column table:style-name="default.15"/>
      <loext:last-row-even-column table:style-name="default.16"/>
      <loext:first-row-end-column table:style-name="default.12"/>
      <loext:first-row-start-column table:style-name="default.11"/>
      <loext:last-row-end-column table:style-name="default.14"/>
      <loext:last-row-start-column table:style-name="defaul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07:27:30.343747000</meta:creation-date>
    <dc:title>Why getting your definitions from the Bible is crucial</dc:title>
    <meta:editing-duration>PT5H7M12S</meta:editing-duration>
    <meta:editing-cycles>273</meta:editing-cycles>
    <meta:generator>LibreOffice/25.8.1.1$Windows_X86_64 LibreOffice_project/54047653041915e595ad4e45cccea684809c77b5</meta:generator>
    <meta:initial-creator>William K. McDannell Jr.</meta:initial-creator>
    <dc:date>2025-09-23T12:44:25.781567700</dc:date>
    <dc:creator>William K. McDannell Jr.</dc:creator>
    <meta:print-date>2025-09-23T12:45:45.173456600</meta:print-date>
    <meta:printed-by>PDF files: William K. McDannell Jr.</meta:printed-by>
    <meta:document-statistic meta:table-count="25" meta:image-count="0" meta:object-count="0" meta:page-count="7" meta:paragraph-count="173" meta:word-count="3149" meta:character-count="17801" meta:non-whitespace-character-count="14750"/>
    <meta:template xlink:type="simple" xlink:actuate="onRequest" xlink:title="default" xlink:href="../../../../AppData/Roaming/LibreOffice/4/user/template/default.ott" meta:date="2025-09-23T07:58:13.357209000"/>
  </office:meta>
</office:document-meta>
</file>