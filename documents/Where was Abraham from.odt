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0000003B4C6C5AB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1c93d7" officeooo:paragraph-rsid="001c93d7" style:font-size-asian="14pt" style:font-size-complex="14pt"/>
    </style:style>
    <style:style style:name="P2" style:family="paragraph" style:parent-style-name="Standard">
      <style:text-properties officeooo:rsid="0044da0f" officeooo:paragraph-rsid="0044da0f"/>
    </style:style>
    <style:style style:name="P3" style:family="paragraph" style:parent-style-name="Standard">
      <style:text-properties officeooo:rsid="00250546"/>
    </style:style>
    <style:style style:name="P4" style:family="paragraph" style:parent-style-name="Table_20_Contents">
      <style:text-properties officeooo:paragraph-rsid="0044da0f"/>
    </style:style>
    <style:style style:name="P5" style:family="paragraph" style:parent-style-name="Standard">
      <style:text-properties officeooo:rsid="00250546" officeooo:paragraph-rsid="0044da0f"/>
    </style:style>
    <style:style style:name="P6" style:family="paragraph" style:parent-style-name="Standard">
      <style:text-properties officeooo:rsid="00454301" officeooo:paragraph-rsid="00454301"/>
    </style:style>
    <style:style style:name="P7" style:family="paragraph" style:parent-style-name="Standard">
      <style:text-properties officeooo:rsid="003e4004" officeooo:paragraph-rsid="00250546"/>
    </style:style>
    <style:style style:name="P8" style:family="paragraph" style:parent-style-name="Standard" style:list-style-name="L1">
      <style:text-properties officeooo:rsid="00485a34" officeooo:paragraph-rsid="00485a34"/>
    </style:style>
    <style:style style:name="T1" style:family="text">
      <style:text-properties fo:color="#127622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position="super 58%"/>
    </style:style>
    <style:style style:name="T4" style:family="text">
      <style:text-properties officeooo:rsid="00468665"/>
    </style:style>
    <style:style style:name="T5" style:family="text">
      <style:text-properties fo:color="#127622" loext:opacity="100%" officeooo:rsid="00468665"/>
    </style:style>
    <style:style style:name="T6" style:family="text">
      <style:text-properties fo:color="#127622" loext:opacity="100%" officeooo:rsid="00310bb8"/>
    </style:style>
    <style:style style:name="T7" style:family="text">
      <style:text-properties fo:color="#127622" loext:opacity="100%" officeooo:rsid="003244cf"/>
    </style:style>
    <style:style style:name="T8" style:family="text">
      <style:text-properties style:text-position="super 58%" officeooo:rsid="003244cf"/>
    </style:style>
    <style:style style:name="T9" style:family="text">
      <style:text-properties officeooo:rsid="003244cf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re was Abraham from?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Genesis 11:31</text:span><text:line-break/>And Terah took Abram his son, and Lot the son of Haran his son's son, and Sarai his daughter in law, his son Abram's wife; and <text:span text:style-name="T2">they went forth with them from Ur of the Chaldees</text:span>, to go into the land of Canaan; and they came unto Haran, and dwelt there.</text:p>
          </table:table-cell>
        </table:table-row>
      </table:table>
      <text:p text:style-name="Standard"/>
      <text:p text:style-name="P2">Abraham’s family moved from Ur of the Chaldees to Haran (in Syria/Padan-aram/Aram-naharaim).</text:p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span text:style-name="T1">Genesis 24:1-4</text:span><text:line-break/><text:span text:style-name="T3">1</text:span> And Abraham was old, and well stricken in age: and the LORD had blessed Abraham in all things.<text:line-break/><text:span text:style-name="T3">2</text:span> And Abraham said unto his eldest servant of his house, that ruled over all that he had, Put, I pray thee, thy hand under my thigh:<text:line-break/><text:span text:style-name="T3">3</text:span> And I will make thee swear by the LORD, the God of heaven, and the God of the earth, that thou shalt not take a wife unto my son of the daughters of the Canaanites, among whom I dwell:<text:line-break/><text:span text:style-name="T3">4</text:span> <text:span text:style-name="T2">But thou shalt go unto my country</text:span>, and <text:span text:style-name="T2">to my kindred</text:span>, and take a wife unto my son Isaac.</text:p>
            <text:p text:style-name="P4"/>
            <text:p text:style-name="P4"><text:span text:style-name="T1">Genesis 24:10</text:span><text:line-break/>And the servant took ten camels of the camels of his master, and departed; for all the goods of his master were in his hand: and <text:span text:style-name="T2">he arose, and went to Mesopotamia, unto the city of Nahor</text:span>.</text:p>
          </table:table-cell>
        </table:table-row>
      </table:table>
      <text:p text:style-name="P5"/>
      <text:p text:style-name="P6">When his son Isaac was of age, Abraham sent his servant back to Mesopotamia (Syria/Padan-aram/Aram-naharaim) to get him a wife from Abraham’s kindred (his brother Nahor’s son Bethuel <text:span text:style-name="T4">had a daughter named Rebekah</text:span>)<text:span text:style-name="T4">(</text:span><text:span text:style-name="T5">Gen 11:26</text:span><text:span text:style-name="T4">, </text:span><text:span text:style-name="T5">22:22,23</text:span><text:span text:style-name="T4">).</text:span></text:p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Genesis 25:20</text:span> (<text:span text:style-name="T6">28:5</text:span>)<text:line-break/>And Isaac was forty years old when he took Rebekah to wife, the daughter of <text:span text:style-name="T2">Bethuel the Syrian of Padanaram</text:span>, the sister to Laban the Syrian.</text:p>
            <text:p text:style-name="Table_20_Contents"/>
            <text:p text:style-name="Table_20_Contents"><text:span text:style-name="T1">Genesis 31:20,</text:span><text:span text:style-name="T7">24</text:span><text:line-break/><text:span text:style-name="T8">20</text:span><text:span text:style-name="T9"> </text:span>And Jacob stole away unawares to <text:span text:style-name="T2">Laban the Syrian</text:span>, in that he told him not that he fled.<text:line-break/><text:span text:style-name="T8">24</text:span><text:span text:style-name="T9"> </text:span>And God came to <text:span text:style-name="T2">Laban the Syrian</text:span> in a dream by night, and said unto him, Take heed that thou speak not to Jacob either good or bad.</text:p>
          </table:table-cell>
        </table:table-row>
      </table:table>
      <text:p text:style-name="P7"/>
      <text:p text:style-name="P7"><text:soft-page-break/><draw:frame draw:style-name="fr1" draw:name="Image1" text:anchor-type="as-char" svg:y="-5.2457in" svg:width="7.9in" svg:height="5.6398in" draw:z-index="0"><draw:image xlink:href="Pictures/1000000100000530000003B4C6C5AB71.png" xlink:type="simple" xlink:show="embed" xlink:actuate="onLoad" draw:mime-type="image/png"/></draw:frame></text:p>
      <text:p text:style-name="P7"/>
      <text:list text:style-name="L1">
        <text:list-item>
          <text:p text:style-name="P8">Abraham’s family travels to Haran and settles there.</text:p>
        </text:list-item>
        <text:list-item>
          <text:p text:style-name="P8">Abraham moves on to Canaan.</text:p>
        </text:list-item>
        <text:list-item>
          <text:p text:style-name="P8">Abraham sents his servant to get a wife for his son Isaac from his brother Nahor’s s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 fo:padding="0.0201in" fo:border-left="1.5pt solid #2a6099" fo:border-right="none" fo:border-top="none" fo:border-bottom="non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07:44:38.740617600</meta:creation-date>
    <dc:title>default</dc:title>
    <meta:editing-duration>PT1H38M2S</meta:editing-duration>
    <meta:editing-cycles>41</meta:editing-cycles>
    <meta:generator>LibreOffice/26.2.4.2$Linux_X86_64 LibreOffice_project/64a984c51f4702dbd3710b13428c673a2f1292e7</meta:generator>
    <dc:date>2026-07-11T12:30:09.417865416</dc:date>
    <meta:document-statistic meta:table-count="3" meta:image-count="1" meta:object-count="0" meta:page-count="2" meta:paragraph-count="12" meta:word-count="363" meta:character-count="1913" meta:non-whitespace-character-count="1564"/>
    <meta:template xlink:type="simple" xlink:actuate="onRequest" xlink:title="default" xlink:href="../../../../AppData/Roaming/LibreOffice/4/user/template/default1.ott" meta:date="2026-03-25T07:44:38.494729300"/>
  </office:meta>
</office:document-meta>
</file>