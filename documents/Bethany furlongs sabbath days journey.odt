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Table_20_Contents">
      <style:text-properties officeooo:paragraph-rsid="001f115a"/>
    </style:style>
    <style:style style:name="P2" style:family="paragraph" style:parent-style-name="Standard" style:list-style-name="L1">
      <style:text-properties officeooo:rsid="0027f2f1" officeooo:paragraph-rsid="0027f2f1"/>
    </style:style>
    <style:style style:name="P3" style:family="paragraph" style:parent-style-name="Table_20_Contents">
      <style:text-properties fo:background-color="transparent"/>
    </style:style>
    <style:style style:name="P4" style:family="paragraph" style:parent-style-name="Standard" style:list-style-name="L2">
      <style:text-properties officeooo:rsid="0027f2f1" officeooo:paragraph-rsid="0027f2f1"/>
    </style:style>
    <style:style style:name="P5" style:family="paragraph" style:parent-style-name="Standard" style:list-style-name="L2">
      <style:text-properties officeooo:rsid="00285f99" officeooo:paragraph-rsid="00285f99"/>
    </style:style>
    <style:style style:name="P6" style:family="paragraph" style:parent-style-name="Standard">
      <style:text-properties officeooo:rsid="00234d6d"/>
    </style:style>
    <style:style style:name="P7" style:family="paragraph" style:parent-style-name="Standard" style:list-style-name="L3">
      <style:text-properties officeooo:rsid="00285f99" officeooo:paragraph-rsid="0028ca5a"/>
    </style:style>
    <style:style style:name="P8" style:family="paragraph" style:parent-style-name="Standard" style:list-style-name="L3">
      <style:text-properties officeooo:rsid="0028ca5a" officeooo:paragraph-rsid="0028ca5a"/>
    </style:style>
    <style:style style:name="T1" style:family="text">
      <style:text-properties fo:color="#127622" loext:opacity="100%"/>
    </style:style>
    <style:style style:name="T2" style:family="text">
      <style:text-properties style:text-position="33% 80%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background-color="#ffff00" loext:char-shading-value="0"/>
    </style:style>
    <style:style style:name="T5" style:family="text">
      <style:text-properties fo:background-color="#ffbf00" loext:char-shading-value="0"/>
    </style:style>
    <style:style style:name="T6" style:family="text">
      <style:text-properties fo:background-color="#fff5ce" loext:char-shading-value="0"/>
    </style:style>
    <style:style style:name="T7" style:family="text">
      <style:text-properties fo:color="#127622" loext:opacity="100%" officeooo:rsid="00213b1b"/>
    </style:style>
    <style:style style:name="T8" style:family="text">
      <style:text-properties fo:background-color="#dee6ef" loext:char-shading-value="0"/>
    </style:style>
    <style:style style:name="T9" style:family="text">
      <style:text-properties fo:background-color="#ff8000" loext:char-shading-value="0"/>
    </style:style>
    <style:style style:name="T10" style:family="text">
      <style:text-properties officeooo:rsid="0028ca5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Luke 24:49-51</text:span><text:line-break/><text:span text:style-name="T2">49</text:span> <text:span text:style-name="T3">And, behold, </text:span><text:span text:style-name="T4">I send the promise of my Father upon you</text:span><text:span text:style-name="T3">: but tarry ye in the city of Jerusalem, until ye be endued with power from on high.</text:span></text:p>
            <text:p text:style-name="P1"><text:span text:style-name="T2">50</text:span> And he led them out as far as <text:span text:style-name="T5">to Bethany</text:span>, and he lifted up his hands, and blessed them.</text:p>
            <text:p text:style-name="P1"><text:span text:style-name="T2">51</text:span> And it came to pass, while he blessed them, <text:span text:style-name="T6">he was parted from them, and carried up into heaven.</text:span></text:p>
          </table:table-cell>
        </table:table-row>
      </table:table>
      <text:list text:style-name="L1">
        <text:list-item>
          <text:p text:style-name="P2">Jesus departed from Bethany</text:p>
        </text:list-item>
      </text:list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Acts 1:4-1</text:span><text:span text:style-name="T7">2</text:span><text:line-break/>4 And, being assembled together with them, commanded them that they should not depart from Jerusalem, but <text:span text:style-name="T4">wait for the promise of the Father</text:span><text:span text:style-name="T3">, which, saith he, ye have heard of me.</text:span><text:line-break/>5 <text:span text:style-name="T3">For John truly baptized with water; but ye shall be baptized with the Holy Ghost not many days hence.</text:span><text:line-break/>6 When they therefore were come together, they asked of him, saying, Lord, wilt thou at this time restore again the kingdom to Israel?<text:line-break/>7 And he said unto them, <text:span text:style-name="T3">It is not for you to know the times or the seasons, which the Father hath put in his own power.</text:span><text:line-break/>8 <text:span text:style-name="T3">But ye shall receive power, after that the Holy Ghost is come upon you: and ye shall be witnesses unto me both in Jerusalem, and in all Judaea, and in Samaria, and unto the uttermost part of the earth.</text:span><text:line-break/>9 And when he had spoken these things, while they beheld, <text:span text:style-name="T6">he was taken up; and a cloud received him out of their sight.</text:span><text:line-break/>10 And while they looked stedfastly toward heaven as he went up, behold, two men stood by them in white apparel;<text:line-break/>11 Which also said, Ye men of Galilee, why stand ye gazing up into heaven? this same Jesus, <text:span text:style-name="T6">which is taken up from you into heaven</text:span>, <text:span text:style-name="T8">shall so come </text:span><text:span text:style-name="T9">in like manner</text:span><text:span text:style-name="T8"> as ye have seen him go into heaven.</text:span></text:p>
            <text:p text:style-name="P3">12 Then returned they unto Jerusalem <text:span text:style-name="T5">from the mount called Olivet</text:span>, which is from Jerusalem a sabbath day's journey.</text:p>
          </table:table-cell>
        </table:table-row>
      </table:table>
      <text:list text:style-name="L2">
        <text:list-item>
          <text:p text:style-name="P4">Jesus departed from Bethany, on the mount of Olives.</text:p>
        </text:list-item>
        <text:list-item>
          <text:p text:style-name="P5">The distance to Jerusalem is one sabbath day’s journey.</text:p>
        </text:list-item>
      </text:list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John 11:18</text:span><text:line-break/>Now Bethany was nigh unto Jerusalem, about fifteen furlongs off:</text:p>
          </table:table-cell>
        </table:table-row>
      </table:table>
      <text:list text:style-name="L3">
        <text:list-item>
          <text:p text:style-name="P7">The distance <text:span text:style-name="T10">from Bethany </text:span>to Jerusalem is “<text:span text:style-name="T10">about fifteen furlongs”.</text:span></text:p>
        </text:list-item>
        <text:list-item>
          <text:p text:style-name="P8">Thus, one sabbath day’s journey ~= fifteen furlong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0T07:44:28.186292900</meta:creation-date>
    <dc:title>default</dc:title>
    <meta:editing-duration>PT1H23M17S</meta:editing-duration>
    <meta:editing-cycles>17</meta:editing-cycles>
    <meta:generator>LibreOffice/26.2.4.2$Linux_X86_64 LibreOffice_project/64a984c51f4702dbd3710b13428c673a2f1292e7</meta:generator>
    <dc:date>2026-07-11T12:31:04.157797188</dc:date>
    <meta:document-statistic meta:table-count="3" meta:image-count="0" meta:object-count="0" meta:page-count="1" meta:paragraph-count="11" meta:word-count="377" meta:character-count="1975" meta:non-whitespace-character-count="1614"/>
    <meta:template xlink:type="simple" xlink:actuate="onRequest" xlink:title="default" xlink:href="../../../../AppData/Roaming/LibreOffice/4/user/template/default1.ott" meta:date="2026-02-10T07:44:27.106735400"/>
  </office:meta>
</office:document-meta>
</file>