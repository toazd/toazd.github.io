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8.1799in" table:align="margins" style:shadow="#808080 0.0201in 0.0201in" style:writing-mode="lr-tb"/>
    </style:style>
    <style:style style:name="Table1.A" style:family="table-column">
      <style:table-column-properties style:column-width="8.1799in" style:rel-column-width="65535*"/>
    </style:style>
    <style:style style:name="Table1.A1" style:family="table-cell">
      <style:table-cell-properties fo:padding="0.0382in" fo:border="0.5pt solid #000000"/>
    </style:style>
    <style:style style:name="Table6" style:family="table">
      <style:table-properties style:width="8.1799in" table:align="margins" style:shadow="#808080 0.0201in 0.0201in" style:writing-mode="lr-tb"/>
    </style:style>
    <style:style style:name="Table6.A" style:family="table-column">
      <style:table-column-properties style:column-width="8.1799in" style:rel-column-width="65535*"/>
    </style:style>
    <style:style style:name="Table6.A1" style:family="table-cell">
      <style:table-cell-properties fo:padding="0.0382in" fo:border="0.75pt solid #000000"/>
    </style:style>
    <style:style style:name="Table7" style:family="table">
      <style:table-properties style:width="8.1799in" table:align="margins" style:shadow="#808080 0.0201in 0.0201in" style:writing-mode="lr-tb"/>
    </style:style>
    <style:style style:name="Table7.A" style:family="table-column">
      <style:table-column-properties style:column-width="8.1799in" style:rel-column-width="65535*"/>
    </style:style>
    <style:style style:name="Table7.A1" style:family="table-cell">
      <style:table-cell-properties fo:padding="0.0382in" fo:border="0.75pt solid #000000"/>
    </style:style>
    <style:style style:name="Table8" style:family="table">
      <style:table-properties style:width="8.1799in" table:align="margins" style:shadow="#808080 0.0201in 0.0201in" style:writing-mode="lr-tb"/>
    </style:style>
    <style:style style:name="Table8.A" style:family="table-column">
      <style:table-column-properties style:column-width="8.1799in" style:rel-column-width="65535*"/>
    </style:style>
    <style:style style:name="Table8.A1" style:family="table-cell">
      <style:table-cell-properties fo:padding="0.0382in" fo:border="0.75pt solid #000000"/>
    </style:style>
    <style:style style:name="P1" style:family="paragraph" style:parent-style-name="Standard">
      <style:paragraph-properties fo:text-align="center" style:justify-single-word="false" fo:break-before="page" style:writing-mode="lr-tb"/>
      <style:text-properties style:font-name="Gabriela" fo:font-size="14pt" officeooo:rsid="001dc53e" officeooo:paragraph-rsid="001dc53e" style:font-size-asian="14pt" style:font-name-complex="Carlito" style:font-size-complex="14pt"/>
    </style:style>
    <style:style style:name="P2" style:family="paragraph" style:parent-style-name="Standard">
      <style:paragraph-properties style:writing-mode="lr-tb"/>
      <style:text-properties style:font-name="Liberation Sans" fo:font-size="12pt" officeooo:rsid="002b412b" officeooo:paragraph-rsid="001dc53e" style:font-size-asian="12pt" style:font-name-complex="Carlito" style:font-size-complex="12pt"/>
    </style:style>
    <style:style style:name="P3" style:family="paragraph" style:parent-style-name="Standard">
      <style:paragraph-properties fo:text-align="left" style:justify-single-word="false" style:writing-mode="lr-tb"/>
      <style:text-properties style:font-name="Liberation Sans" fo:font-size="12pt" officeooo:paragraph-rsid="0025079f" style:font-size-asian="12pt" style:font-size-complex="12pt"/>
    </style:style>
    <style:style style:name="P4" style:family="paragraph" style:parent-style-name="Standard">
      <style:paragraph-properties fo:text-align="left" style:justify-single-word="false" style:writing-mode="lr-tb"/>
      <style:text-properties style:font-name="Liberation Sans" fo:font-size="12pt" officeooo:rsid="00233bea" officeooo:paragraph-rsid="00233bea" style:font-size-asian="12pt" style:font-name-complex="Carlito" style:font-size-complex="12pt"/>
    </style:style>
    <style:style style:name="P5" style:family="paragraph" style:parent-style-name="Standard">
      <style:paragraph-properties fo:text-align="left" style:justify-single-word="false" style:writing-mode="lr-tb"/>
      <style:text-properties style:font-name="Liberation Sans" fo:font-size="12pt" officeooo:paragraph-rsid="00233bea" style:font-size-asian="12pt" style:font-size-complex="12pt"/>
    </style:style>
    <style:style style:name="P6" style:family="paragraph" style:parent-style-name="Standard">
      <style:paragraph-properties fo:text-align="left" style:justify-single-word="false" style:writing-mode="lr-tb"/>
      <style:text-properties style:font-name="Liberation Sans" fo:font-size="12pt" officeooo:rsid="001dc53e" officeooo:paragraph-rsid="001dc53e" style:font-size-asian="12pt" style:font-name-complex="Carlito" style:font-size-complex="12pt"/>
    </style:style>
    <style:style style:name="P7" style:family="paragraph" style:parent-style-name="Table_20_Contents">
      <style:paragraph-properties fo:text-align="left" style:justify-single-word="false"/>
      <style:text-properties style:font-name="Liberation Sans" fo:font-size="12pt" officeooo:paragraph-rsid="001dc53e" style:font-size-asian="12pt" style:font-name-complex="Carlito" style:font-size-complex="12pt"/>
    </style:style>
    <style:style style:name="P8" style:family="paragraph" style:parent-style-name="Standard">
      <style:paragraph-properties fo:text-align="left" style:justify-single-word="false" style:writing-mode="lr-tb"/>
      <style:text-properties style:font-name="Liberation Sans" fo:font-size="12pt" officeooo:rsid="00217dd2" officeooo:paragraph-rsid="001dc53e" style:font-size-asian="12pt" style:font-name-complex="Carlito" style:font-size-complex="12pt"/>
    </style:style>
    <style:style style:name="P9" style:family="paragraph" style:parent-style-name="Standard">
      <style:paragraph-properties fo:text-align="left" style:justify-single-word="false" style:writing-mode="lr-tb"/>
      <style:text-properties style:font-name="Liberation Sans" fo:font-size="12pt" officeooo:rsid="00217dd2" officeooo:paragraph-rsid="007382bd" style:font-size-asian="12pt" style:font-name-complex="Carlito" style:font-size-complex="12pt"/>
    </style:style>
    <style:style style:name="P10" style:family="paragraph" style:parent-style-name="Standard">
      <style:paragraph-properties fo:text-align="left" style:justify-single-word="false" style:writing-mode="lr-tb"/>
      <style:text-properties style:font-name="Liberation Sans" fo:font-size="12pt" officeooo:rsid="00217dd2" officeooo:paragraph-rsid="00233bea" style:font-size-asian="12pt" style:font-name-complex="Carlito" style:font-size-complex="12pt"/>
    </style:style>
    <style:style style:name="P11" style:family="paragraph" style:parent-style-name="Standard">
      <style:paragraph-properties fo:text-align="left" style:justify-single-word="false" style:writing-mode="lr-tb"/>
      <style:text-properties style:font-name="Liberation Sans" fo:font-size="12pt" officeooo:rsid="0078b721" officeooo:paragraph-rsid="0078b721" style:font-size-asian="12pt" style:font-name-complex="Carlito" style:font-size-complex="12pt"/>
    </style:style>
    <style:style style:name="P12" style:family="paragraph" style:parent-style-name="Standard" style:list-style-name="L1">
      <style:paragraph-properties fo:text-align="left" style:justify-single-word="false" style:writing-mode="lr-tb"/>
      <style:text-properties style:font-name="Liberation Sans" fo:font-size="12pt" officeooo:rsid="0022b7cc" officeooo:paragraph-rsid="00370300" style:font-size-asian="12pt" style:font-name-complex="Carlito" style:font-size-complex="12pt"/>
    </style:style>
    <style:style style:name="P13" style:family="paragraph" style:parent-style-name="Standard" style:list-style-name="L1">
      <style:paragraph-properties fo:text-align="left" style:justify-single-word="false" style:writing-mode="lr-tb"/>
      <style:text-properties style:font-name="Liberation Sans" fo:font-size="12pt" officeooo:paragraph-rsid="00370300" style:font-size-asian="12pt" style:font-size-complex="12pt"/>
    </style:style>
    <style:style style:name="P14" style:family="paragraph" style:parent-style-name="Standard" style:list-style-name="L1">
      <style:paragraph-properties fo:text-align="left" style:justify-single-word="false" style:writing-mode="lr-tb"/>
      <style:text-properties style:font-name="Liberation Sans" fo:font-size="12pt" officeooo:rsid="003aadc7" officeooo:paragraph-rsid="003aadc7" style:font-size-asian="12pt" style:font-name-complex="Carlito" style:font-size-complex="12pt"/>
    </style:style>
    <style:style style:name="P15" style:family="paragraph" style:parent-style-name="Standard">
      <style:paragraph-properties fo:text-align="left" style:justify-single-word="false" style:writing-mode="lr-tb"/>
      <style:text-properties style:font-name="Liberation Sans" fo:font-size="12pt" officeooo:rsid="00370300" officeooo:paragraph-rsid="00370300" style:font-size-asian="12pt" style:font-name-complex="Carlito" style:font-size-complex="12pt"/>
    </style:style>
    <style:style style:name="P16" style:family="paragraph" style:parent-style-name="Standard">
      <style:paragraph-properties fo:text-align="left" style:justify-single-word="false" style:writing-mode="lr-tb"/>
      <style:text-properties style:font-name="Liberation Sans" fo:font-size="12pt" officeooo:rsid="001dc53e" officeooo:paragraph-rsid="003b685d" style:font-size-asian="12pt" style:font-name-complex="Carlito" style:font-size-complex="12pt"/>
    </style:style>
    <style:style style:name="P17" style:family="paragraph" style:parent-style-name="Standard">
      <style:paragraph-properties fo:text-align="left" style:justify-single-word="false" style:writing-mode="lr-tb"/>
      <style:text-properties style:font-name="Liberation Sans" fo:font-size="12pt" officeooo:paragraph-rsid="001dc53e" style:font-size-asian="12pt" style:font-size-complex="12pt"/>
    </style:style>
    <style:style style:name="P18" style:family="paragraph" style:parent-style-name="Standard">
      <style:paragraph-properties fo:text-align="left" style:justify-single-word="false" style:writing-mode="lr-tb"/>
      <style:text-properties style:font-name="Liberation Sans" fo:font-size="12pt" officeooo:rsid="0114c042" officeooo:paragraph-rsid="001dc53e" style:font-size-asian="12pt" style:font-name-complex="Carlito" style:font-size-complex="12pt"/>
    </style:style>
    <style:style style:name="P19" style:family="paragraph" style:parent-style-name="Table_20_Contents">
      <style:text-properties style:font-name="Liberation Sans" fo:font-size="12pt" officeooo:paragraph-rsid="001dc53e" style:font-size-asian="12pt" style:font-size-complex="12pt"/>
    </style:style>
    <style:style style:name="P20" style:family="paragraph" style:parent-style-name="Standard" style:list-style-name="L2">
      <style:paragraph-properties fo:text-align="left" style:justify-single-word="false" style:writing-mode="lr-tb"/>
      <style:text-properties style:font-name="Liberation Sans" fo:font-size="12pt" officeooo:rsid="005e3d46" officeooo:paragraph-rsid="001dc53e" style:font-size-asian="12pt" style:font-name-complex="Carlito" style:font-size-complex="12pt"/>
    </style:style>
    <style:style style:name="P21" style:family="paragraph" style:parent-style-name="Standard" style:list-style-name="L2">
      <style:paragraph-properties fo:text-align="left" style:justify-single-word="false" style:writing-mode="lr-tb"/>
      <style:text-properties style:font-name="Liberation Sans" fo:font-size="12pt" officeooo:paragraph-rsid="001dc53e" style:font-size-asian="12pt" style:font-size-complex="12pt"/>
    </style:style>
    <style:style style:name="P22" style:family="paragraph" style:parent-style-name="Standard">
      <style:paragraph-properties fo:text-align="left" style:justify-single-word="false" style:writing-mode="lr-tb"/>
      <style:text-properties style:font-name="Liberation Sans" fo:font-size="12pt" officeooo:rsid="005e3d46" officeooo:paragraph-rsid="001dc53e" style:font-size-asian="12pt" style:font-name-complex="Carlito" style:font-size-complex="12pt"/>
    </style:style>
    <style:style style:name="P23" style:family="paragraph" style:parent-style-name="Standard" style:list-style-name="L3">
      <style:paragraph-properties fo:text-align="left" style:justify-single-word="false" style:writing-mode="lr-tb"/>
      <style:text-properties style:font-name="Liberation Sans" fo:font-size="12pt" officeooo:rsid="005c2f36" officeooo:paragraph-rsid="001dc53e" style:font-size-asian="12pt" style:font-name-complex="Carlito" style:font-size-complex="12pt"/>
    </style:style>
    <style:style style:name="P24" style:family="paragraph" style:parent-style-name="Standard" style:list-style-name="L3">
      <style:paragraph-properties fo:text-align="left" style:justify-single-word="false" style:writing-mode="lr-tb"/>
      <style:text-properties style:font-name="Liberation Sans" fo:font-size="12pt" officeooo:paragraph-rsid="001dc53e" style:font-size-asian="12pt" style:font-size-complex="12pt"/>
    </style:style>
    <style:style style:name="P25" style:family="paragraph" style:parent-style-name="Standard">
      <style:paragraph-properties fo:text-align="left" style:justify-single-word="false" style:writing-mode="lr-tb"/>
      <style:text-properties style:font-name="Liberation Sans" fo:font-size="12pt" officeooo:rsid="005c2f36" officeooo:paragraph-rsid="001dc53e" style:font-size-asian="12pt" style:font-name-complex="Carlito" style:font-size-complex="12pt"/>
    </style:style>
    <style:style style:name="P26" style:family="paragraph" style:parent-style-name="Standard" style:list-style-name="L4">
      <style:paragraph-properties fo:text-align="left" style:justify-single-word="false" style:writing-mode="lr-tb"/>
      <style:text-properties style:font-name="Liberation Sans" fo:font-size="12pt" officeooo:paragraph-rsid="001dc53e" style:font-size-asian="12pt" style:font-size-complex="12pt"/>
    </style:style>
    <style:style style:name="P27" style:family="paragraph" style:parent-style-name="Standard">
      <style:paragraph-properties fo:text-align="left" style:justify-single-word="false" style:writing-mode="lr-tb"/>
      <style:text-properties style:font-name="Liberation Sans" fo:font-size="12pt" officeooo:rsid="01f88e64" officeooo:paragraph-rsid="001dc53e" style:font-size-asian="12pt" style:font-name-complex="Carlito" style:font-size-complex="12pt"/>
    </style:style>
    <style:style style:name="P28" style:family="paragraph" style:parent-style-name="Standard">
      <style:paragraph-properties fo:text-align="left" style:justify-single-word="false" style:writing-mode="lr-tb"/>
      <style:text-properties style:font-name="Liberation Sans" fo:font-size="12pt" officeooo:rsid="00401b8b" officeooo:paragraph-rsid="00401b8b" style:font-size-asian="12pt" style:font-name-complex="Carlito" style:font-size-complex="12pt"/>
    </style:style>
    <style:style style:name="P29" style:family="paragraph" style:parent-style-name="Standard">
      <style:paragraph-properties fo:text-align="left" style:justify-single-word="false" style:writing-mode="lr-tb"/>
      <style:text-properties style:font-name="Liberation Sans" fo:font-size="12pt" officeooo:paragraph-rsid="003d3042" style:font-size-asian="12pt" style:font-size-complex="12pt"/>
    </style:style>
    <style:style style:name="P30" style:family="paragraph" style:parent-style-name="Standard">
      <style:paragraph-properties fo:text-align="left" style:justify-single-word="false" style:writing-mode="lr-tb"/>
      <style:text-properties style:font-name="Liberation Sans" fo:font-size="12pt" officeooo:rsid="004ac594" officeooo:paragraph-rsid="003d3042" style:font-size-asian="12pt" style:font-name-complex="Carlito" style:font-size-complex="12pt"/>
    </style:style>
    <style:style style:name="P31" style:family="paragraph" style:parent-style-name="Standard" style:list-style-name="L5">
      <style:paragraph-properties fo:text-align="left" style:justify-single-word="false" style:writing-mode="lr-tb" style:writing-mode-automatic="false"/>
      <style:text-properties style:font-name="Liberation Sans" fo:font-size="12pt" officeooo:rsid="004c3c78" officeooo:paragraph-rsid="0055cc2f" style:font-size-asian="12pt" style:font-name-complex="Carlito" style:font-size-complex="12pt"/>
    </style:style>
    <style:style style:name="P32" style:family="paragraph" style:parent-style-name="Standard" style:list-style-name="L6">
      <style:paragraph-properties fo:text-align="left" style:justify-single-word="false" style:writing-mode="lr-tb" style:writing-mode-automatic="false"/>
      <style:text-properties officeooo:paragraph-rsid="0055cc2f"/>
    </style:style>
    <style:style style:name="P33" style:family="paragraph" style:parent-style-name="Standard" style:list-style-name="L5">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4" style:family="paragraph" style:parent-style-name="Standard" style:list-style-name="L7">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5" style:family="paragraph" style:parent-style-name="Standard" style:list-style-name="L7">
      <style:paragraph-properties fo:text-align="left" style:justify-single-word="false" style:writing-mode="lr-tb" style:writing-mode-automatic="false"/>
      <style:text-properties officeooo:paragraph-rsid="0055cc2f"/>
    </style:style>
    <style:style style:name="P36" style:family="paragraph" style:parent-style-name="Standard" style:list-style-name="L7">
      <style:paragraph-properties fo:text-align="left" style:justify-single-word="false" style:writing-mode="lr-tb" style:writing-mode-automatic="false"/>
      <style:text-properties style:font-name="Liberation Sans" fo:font-size="12pt" officeooo:rsid="004db3c2" officeooo:paragraph-rsid="006d85ad" style:font-size-asian="12pt" style:font-name-complex="Carlito" style:font-size-complex="12pt"/>
    </style:style>
    <style:style style:name="P37" style:family="paragraph" style:parent-style-name="Standard" style:list-style-name="L8">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8" style:family="paragraph" style:parent-style-name="Standard" style:list-style-name="L8">
      <style:paragraph-properties fo:text-align="left" style:justify-single-word="false" style:writing-mode="lr-tb" style:writing-mode-automatic="false"/>
      <style:text-properties style:font-name="Liberation Sans" fo:font-size="12pt" officeooo:rsid="004db3c2" officeooo:paragraph-rsid="005bc313" style:font-size-asian="12pt" style:font-name-complex="Carlito" style:font-size-complex="12pt"/>
    </style:style>
    <style:style style:name="P39" style:family="paragraph" style:parent-style-name="Standard" style:list-style-name="L5">
      <style:paragraph-properties fo:text-align="left" style:justify-single-word="false" style:writing-mode="lr-tb" style:writing-mode-automatic="false"/>
      <style:text-properties style:font-name="Liberation Sans" fo:font-size="12pt" fo:font-weight="bold" officeooo:rsid="004db3c2" officeooo:paragraph-rsid="0055cc2f" style:font-size-asian="12pt" style:font-weight-asian="bold" style:font-name-complex="Carlito" style:font-size-complex="12pt" style:font-weight-complex="bold"/>
    </style:style>
    <style:style style:name="P40" style:family="paragraph" style:parent-style-name="Standard" style:list-style-name="L9">
      <style:paragraph-properties fo:text-align="left" style:justify-single-word="false" style:writing-mode="lr-tb" style:writing-mode-automatic="false"/>
      <style:text-properties style:font-name="Liberation Sans" fo:font-size="12pt" fo:font-weight="normal" officeooo:rsid="004db3c2" officeooo:paragraph-rsid="0055cc2f" style:font-size-asian="12pt" style:font-weight-asian="normal" style:font-name-complex="Carlito" style:font-size-complex="12pt" style:font-weight-complex="normal"/>
    </style:style>
    <style:style style:name="P41" style:family="paragraph" style:parent-style-name="Standard">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42" style:family="paragraph" style:parent-style-name="Standard">
      <style:paragraph-properties style:writing-mode="lr-tb"/>
      <style:text-properties style:font-name="Liberation Sans" fo:font-size="12pt" officeooo:paragraph-rsid="008798fd" style:font-size-asian="12pt" style:font-size-complex="12pt"/>
    </style:style>
    <style:style style:name="P43" style:family="paragraph" style:parent-style-name="Standard">
      <style:paragraph-properties style:writing-mode="lr-tb"/>
      <style:text-properties style:font-name="Liberation Sans" fo:font-size="12pt" style:font-size-asian="12pt" style:font-size-complex="12pt"/>
    </style:style>
    <style:style style:name="T1" style:family="text">
      <style:text-properties officeooo:rsid="001dc53e" style:font-name-complex="Carlito"/>
    </style:style>
    <style:style style:name="T2" style:family="text">
      <style:text-properties fo:font-style="italic" officeooo:rsid="001dc53e" style:font-style-asian="italic" style:font-name-complex="Carlito" style:font-style-complex="italic"/>
    </style:style>
    <style:style style:name="T3" style:family="text">
      <style:text-properties officeooo:rsid="0114c042" style:font-name-complex="Carlito"/>
    </style:style>
    <style:style style:name="T4" style:family="text">
      <style:text-properties officeooo:rsid="0025079f" style:font-name-complex="Carlito"/>
    </style:style>
    <style:style style:name="T5" style:family="text">
      <style:text-properties officeooo:rsid="00233bea" style:font-name-complex="Carlito"/>
    </style:style>
    <style:style style:name="T6" style:family="text">
      <style:text-properties officeooo:rsid="0035938a" style:font-name-complex="Carlito"/>
    </style:style>
    <style:style style:name="T7" style:family="text">
      <style:text-properties officeooo:rsid="003645eb" style:font-name-complex="Carlito"/>
    </style:style>
    <style:style style:name="T8" style:family="text">
      <style:text-properties fo:color="#127622" loext:opacity="100%" officeooo:rsid="001dc53e" style:font-name-complex="Carlito"/>
    </style:style>
    <style:style style:name="T9" style:family="text">
      <style:text-properties fo:color="#127622" loext:opacity="100%"/>
    </style:style>
    <style:style style:name="T10" style:family="text">
      <style:text-properties style:text-position="33% 80%"/>
    </style:style>
    <style:style style:name="T11" style:family="text">
      <style:text-properties fo:color="#ff0000" loext:opacity="100%"/>
    </style:style>
    <style:style style:name="T12" style:family="text">
      <style:text-properties fo:color="#ff0000" loext:opacity="100%" fo:background-color="#ffff00" loext:char-shading-value="0"/>
    </style:style>
    <style:style style:name="T13" style:family="text">
      <style:text-properties fo:color="#ff0000" loext:opacity="100%" fo:background-color="#fff5ce" loext:char-shading-value="0"/>
    </style:style>
    <style:style style:name="T14" style:family="text">
      <style:text-properties officeooo:rsid="00230559"/>
    </style:style>
    <style:style style:name="T15" style:family="text">
      <style:text-properties officeooo:rsid="0027dad7"/>
    </style:style>
    <style:style style:name="T16" style:family="text">
      <style:text-properties officeooo:rsid="007382bd"/>
    </style:style>
    <style:style style:name="T17" style:family="text">
      <style:text-properties fo:font-weight="bold" officeooo:rsid="007382bd" style:font-weight-asian="bold" style:font-weight-complex="bold"/>
    </style:style>
    <style:style style:name="T18" style:family="text">
      <style:text-properties officeooo:rsid="007525f5"/>
    </style:style>
    <style:style style:name="T19" style:family="text">
      <style:text-properties officeooo:rsid="00257dc6"/>
    </style:style>
    <style:style style:name="T20" style:family="text">
      <style:text-properties fo:font-weight="bold" officeooo:rsid="00257dc6" style:font-weight-asian="bold" style:font-weight-complex="bold"/>
    </style:style>
    <style:style style:name="T21" style:family="text">
      <style:text-properties fo:color="#127622" loext:opacity="100%" officeooo:rsid="00257dc6"/>
    </style:style>
    <style:style style:name="T22" style:family="text">
      <style:text-properties officeooo:rsid="00262003"/>
    </style:style>
    <style:style style:name="T23" style:family="text">
      <style:text-properties fo:color="#127622" loext:opacity="100%" officeooo:rsid="00262003"/>
    </style:style>
    <style:style style:name="T24" style:family="text">
      <style:text-properties fo:font-weight="bold" style:font-weight-asian="bold" style:font-weight-complex="bold"/>
    </style:style>
    <style:style style:name="T25" style:family="text">
      <style:text-properties fo:color="#127622" loext:opacity="100%" officeooo:rsid="0022b7cc" style:font-name-complex="Carlito"/>
    </style:style>
    <style:style style:name="T26" style:family="text">
      <style:text-properties fo:color="#127622" loext:opacity="100%" officeooo:rsid="0038ef98" style:font-name-complex="Carlito"/>
    </style:style>
    <style:style style:name="T27" style:family="text">
      <style:text-properties officeooo:rsid="0022b7cc" style:font-name-complex="Carlito"/>
    </style:style>
    <style:style style:name="T28" style:family="text">
      <style:text-properties officeooo:rsid="00370300" style:font-name-complex="Carlito"/>
    </style:style>
    <style:style style:name="T29" style:family="text">
      <style:text-properties fo:font-weight="bold" officeooo:rsid="0022b7cc" style:font-weight-asian="bold" style:font-name-complex="Carlito" style:font-weight-complex="bold"/>
    </style:style>
    <style:style style:name="T30" style:family="text">
      <style:text-properties fo:color="#127622" loext:opacity="100%" officeooo:rsid="00799aa1" style:font-name-complex="Carlito"/>
    </style:style>
    <style:style style:name="T31" style:family="text">
      <style:text-properties officeooo:rsid="04e99893" style:font-name-complex="Carlito"/>
    </style:style>
    <style:style style:name="T32" style:family="text">
      <style:text-properties officeooo:rsid="01157aca" style:font-name-complex="Carlito"/>
    </style:style>
    <style:style style:name="T33" style:family="text">
      <style:text-properties officeooo:rsid="088355e3" style:font-name-complex="Carlito"/>
    </style:style>
    <style:style style:name="T34" style:family="text">
      <style:text-properties officeooo:rsid="01367575" style:font-name-complex="Carlito"/>
    </style:style>
    <style:style style:name="T35" style:family="text">
      <style:text-properties officeooo:rsid="04ea8518" style:font-name-complex="Carlito"/>
    </style:style>
    <style:style style:name="T36" style:family="text">
      <style:text-properties officeooo:rsid="003d13b8" style:font-name-complex="Carlito"/>
    </style:style>
    <style:style style:name="T37" style:family="text">
      <style:text-properties fo:color="#127622" loext:opacity="100%" fo:language="en" fo:country="US" officeooo:rsid="04553ef7" style:letter-kerning="false" style:font-family-asian="'DejaVu Sans'" style:font-family-generic-asian="system" style:font-pitch-asian="variable" style:language-asian="zh" style:country-asian="CN" style:font-name-complex="Carlito" style:language-complex="hi" style:country-complex="IN"/>
    </style:style>
    <style:style style:name="T38" style:family="text">
      <style:text-properties style:font-name-complex="Carlito"/>
    </style:style>
    <style:style style:name="T39" style:family="text">
      <style:text-properties fo:color="#ff0000" loext:opacity="100%" style:font-name-complex="Carlito"/>
    </style:style>
    <style:style style:name="T40" style:family="text">
      <style:text-properties style:use-window-font-color="true" loext:opacity="0%" style:text-position="super 58%" officeooo:rsid="01f5b351" style:font-name-complex="Carlito"/>
    </style:style>
    <style:style style:name="T41" style:family="text">
      <style:text-properties fo:color="#ff0000" loext:opacity="100%" fo:background-color="#fff5ce" loext:char-shading-value="0" style:font-name-complex="Carlito"/>
    </style:style>
    <style:style style:name="T42" style:family="text">
      <style:text-properties style:text-position="super 58%" officeooo:rsid="005ac9f3" style:font-name-complex="Carlito"/>
    </style:style>
    <style:style style:name="T43" style:family="text">
      <style:text-properties style:text-underline-style="solid" style:text-underline-width="auto" style:text-underline-color="font-color"/>
    </style:style>
    <style:style style:name="T44" style:family="text">
      <style:text-properties officeooo:rsid="022d4502" style:font-name-complex="Carlito"/>
    </style:style>
    <style:style style:name="T45" style:family="text">
      <style:text-properties officeooo:rsid="022dc2d3" style:font-name-complex="Carlito"/>
    </style:style>
    <style:style style:name="T46" style:family="text">
      <style:text-properties officeooo:rsid="04eaf6f5" style:font-name-complex="Carlito"/>
    </style:style>
    <style:style style:name="T47" style:family="text">
      <style:text-properties officeooo:rsid="060f4094" style:font-name-complex="Carlito"/>
    </style:style>
    <style:style style:name="T48" style:family="text">
      <style:text-properties officeooo:rsid="02bd0ca5" style:font-name-complex="Carlito"/>
    </style:style>
    <style:style style:name="T49" style:family="text">
      <style:text-properties officeooo:rsid="02b99ed4" style:font-name-complex="Carlito"/>
    </style:style>
    <style:style style:name="T50" style:family="text">
      <style:text-properties officeooo:rsid="02bc61c3" style:font-name-complex="Carlito"/>
    </style:style>
    <style:style style:name="T51" style:family="text">
      <style:text-properties officeooo:rsid="02baed32" style:font-name-complex="Carlito"/>
    </style:style>
    <style:style style:name="T52" style:family="text">
      <style:text-properties officeooo:rsid="02beaa0b" style:font-name-complex="Carlito"/>
    </style:style>
    <style:style style:name="T53" style:family="text">
      <style:text-properties officeooo:rsid="02bc9576" style:font-name-complex="Carlito"/>
    </style:style>
    <style:style style:name="T54" style:family="text">
      <style:text-properties officeooo:rsid="01165017" style:font-name-complex="Carlito"/>
    </style:style>
    <style:style style:name="T55" style:family="text">
      <style:text-properties officeooo:rsid="01179fba" style:font-name-complex="Carlito"/>
    </style:style>
    <style:style style:name="T56" style:family="text">
      <style:text-properties fo:font-style="normal" fo:font-weight="bold" officeooo:rsid="01389b18" style:font-style-asian="normal" style:font-weight-asian="bold" style:font-name-complex="Carlito" style:font-style-complex="normal" style:font-weight-complex="bold"/>
    </style:style>
    <style:style style:name="T57" style:family="text">
      <style:text-properties fo:font-style="normal" fo:font-weight="bold" officeooo:rsid="015656f6" style:font-style-asian="normal" style:font-weight-asian="bold" style:font-name-complex="Carlito" style:font-style-complex="normal" style:font-weight-complex="bold"/>
    </style:style>
    <style:style style:name="T58" style:family="text">
      <style:text-properties fo:font-style="normal" officeooo:rsid="01389b18" style:font-style-asian="normal" style:font-name-complex="Carlito" style:font-style-complex="normal"/>
    </style:style>
    <style:style style:name="T59" style:family="text">
      <style:text-properties fo:font-style="normal" officeooo:rsid="088be4b5" style:font-style-asian="normal" style:font-name-complex="Carlito" style:font-style-complex="normal"/>
    </style:style>
    <style:style style:name="T60" style:family="text">
      <style:text-properties fo:font-style="normal" officeooo:rsid="00426860" style:font-style-asian="normal" style:font-name-complex="Carlito" style:font-style-complex="normal"/>
    </style:style>
    <style:style style:name="T61" style:family="text">
      <style:text-properties fo:font-style="normal" officeooo:rsid="00430118" style:font-style-asian="normal" style:font-name-complex="Carlito" style:font-style-complex="normal"/>
    </style:style>
    <style:style style:name="T62" style:family="text">
      <style:text-properties fo:font-style="normal" officeooo:rsid="08908b45" style:font-style-asian="normal" style:font-name-complex="Carlito" style:font-style-complex="normal"/>
    </style:style>
    <style:style style:name="T63" style:family="text">
      <style:text-properties fo:font-style="normal" officeooo:rsid="08883b24" style:font-style-asian="normal" style:font-name-complex="Carlito" style:font-style-complex="normal"/>
    </style:style>
    <style:style style:name="T64" style:family="text">
      <style:text-properties fo:font-style="italic" officeooo:rsid="08883b24" style:font-style-asian="italic" style:font-name-complex="Carlito" style:font-style-complex="italic"/>
    </style:style>
    <style:style style:name="T65" style:family="text">
      <style:text-properties fo:font-style="normal" officeooo:rsid="0045cb86" style:font-style-asian="normal" style:font-name-complex="Carlito" style:font-style-complex="normal"/>
    </style:style>
    <style:style style:name="T66" style:family="text">
      <style:text-properties fo:font-style="normal" officeooo:rsid="088f5836" style:font-style-asian="normal" style:font-name-complex="Carlito" style:font-style-complex="normal"/>
    </style:style>
    <style:style style:name="T67" style:family="text">
      <style:text-properties fo:font-style="normal" officeooo:rsid="0938ae39" style:font-style-asian="normal" style:font-name-complex="Carlito" style:font-style-complex="normal"/>
    </style:style>
    <style:style style:name="T68" style:family="text">
      <style:text-properties fo:font-style="italic" officeooo:rsid="0938ae39" style:font-style-asian="italic" style:font-name-complex="Carlito" style:font-style-complex="italic"/>
    </style:style>
    <style:style style:name="T69" style:family="text">
      <style:text-properties fo:font-style="normal" officeooo:rsid="007bd02b" style:font-style-asian="normal" style:font-name-complex="Carlito" style:font-style-complex="normal"/>
    </style:style>
    <style:style style:name="T70" style:family="text">
      <style:text-properties fo:font-style="normal" officeooo:rsid="007bf613" style:font-style-asian="normal" style:font-name-complex="Carlito" style:font-style-complex="normal"/>
    </style:style>
    <style:style style:name="T71" style:family="text">
      <style:text-properties fo:font-style="normal" officeooo:rsid="003d6d18" style:font-style-asian="normal" style:font-name-complex="Carlito" style:font-style-complex="normal"/>
    </style:style>
    <style:style style:name="T72" style:family="text">
      <style:text-properties fo:font-style="normal" officeooo:rsid="088e5a82" style:font-style-asian="normal" style:font-name-complex="Carlito" style:font-style-complex="normal"/>
    </style:style>
    <style:style style:name="T73" style:family="text">
      <style:text-properties fo:font-style="italic" officeooo:rsid="088e5a82" style:font-style-asian="italic" style:font-name-complex="Carlito" style:font-style-complex="italic"/>
    </style:style>
    <style:style style:name="T74" style:family="text">
      <style:text-properties style:use-window-font-color="true" loext:opacity="0%" style:text-position="33% 80%" style:font-name-complex="Carlito"/>
    </style:style>
    <style:style style:name="T75" style:family="text">
      <style:text-properties fo:background-color="#fff5ce" loext:char-shading-value="0" style:font-name-complex="Carlito"/>
    </style:style>
    <style:style style:name="T76" style:family="text">
      <style:text-properties fo:background-color="#ffbf00" loext:char-shading-value="0" style:font-name-complex="Carlito"/>
    </style:style>
    <style:style style:name="T77" style:family="text">
      <style:text-properties style:text-position="super 58%" officeooo:rsid="005ac9f3" fo:background-color="transparent" loext:char-shading-value="0" style:font-name-complex="Carlito"/>
    </style:style>
    <style:style style:name="T78" style:family="text">
      <style:text-properties style:use-window-font-color="true" loext:opacity="0%" style:text-position="33% 80%" officeooo:rsid="0062deab" style:font-name-complex="Carlito"/>
    </style:style>
    <style:style style:name="T79" style:family="text">
      <style:text-properties officeooo:rsid="02551727"/>
    </style:style>
    <style:style style:name="T80" style:family="text">
      <style:text-properties officeooo:rsid="01186430"/>
    </style:style>
    <style:style style:name="T81" style:family="text">
      <style:text-properties style:text-position="super 58%" officeooo:rsid="013a7780"/>
    </style:style>
    <style:style style:name="T82" style:family="text">
      <style:text-properties officeooo:rsid="02c2c3ce"/>
    </style:style>
    <style:style style:name="T83" style:family="text">
      <style:text-properties officeooo:rsid="0886da6a"/>
    </style:style>
    <style:style style:name="T84" style:family="text">
      <style:text-properties officeooo:rsid="0256024a"/>
    </style:style>
    <style:style style:name="T85" style:family="text">
      <style:text-properties officeooo:rsid="011a5167"/>
    </style:style>
    <style:style style:name="T86" style:family="text">
      <style:text-properties officeooo:rsid="04f1048f"/>
    </style:style>
    <style:style style:name="T87" style:family="text">
      <style:text-properties officeooo:rsid="08863a5e"/>
    </style:style>
    <style:style style:name="T88" style:family="text">
      <style:text-properties fo:font-weight="bold" officeooo:rsid="08863a5e" style:font-weight-asian="bold" style:font-weight-complex="bold"/>
    </style:style>
    <style:style style:name="T89" style:family="text">
      <style:text-properties officeooo:rsid="00649617" style:font-name-complex="Carlito"/>
    </style:style>
    <style:style style:name="T90" style:family="text">
      <style:text-properties officeooo:rsid="0064834c" style:font-name-complex="Carlito"/>
    </style:style>
    <style:style style:name="T91" style:family="text">
      <style:text-properties officeooo:rsid="006bf786" style:font-name-complex="Carlito"/>
    </style:style>
    <style:style style:name="T92" style:family="text">
      <style:text-properties officeooo:rsid="00691b02" style:font-name-complex="Carlito"/>
    </style:style>
    <style:style style:name="T93" style:family="text">
      <style:text-properties officeooo:rsid="02376006" style:font-name-complex="Carlito"/>
    </style:style>
    <style:style style:name="T94" style:family="text">
      <style:text-properties officeooo:rsid="0089d86a" style:font-name-complex="Carlito"/>
    </style:style>
    <style:style style:name="T95" style:family="text">
      <style:text-properties fo:color="#158466" loext:opacity="100%" officeooo:rsid="0089d86a" style:font-name-complex="Carlito"/>
    </style:style>
    <style:style style:name="T96" style:family="text">
      <style:text-properties fo:color="#158466" loext:opacity="100%" officeooo:rsid="008b46f5" style:font-name-complex="Carlito"/>
    </style:style>
    <style:style style:name="T97" style:family="text">
      <style:text-properties fo:background-color="transparent" loext:char-shading-value="0" style:font-name-complex="Carlito"/>
    </style:style>
    <style:style style:name="T98" style:family="text">
      <style:text-properties fo:font-style="italic" style:font-name-complex="Carlito"/>
    </style:style>
    <style:style style:name="T99" style:family="text">
      <style:text-properties fo:font-weight="normal" officeooo:rsid="013fc3e7" style:font-weight-asian="normal" style:font-name-complex="Carlito" style:font-weight-complex="normal"/>
    </style:style>
    <style:style style:name="T100" style:family="text">
      <style:text-properties fo:font-weight="normal" officeooo:rsid="013e3a07" style:font-weight-asian="normal" style:font-name-complex="Carlito" style:font-weight-complex="normal"/>
    </style:style>
    <style:style style:name="T101" style:family="text">
      <style:text-properties fo:font-weight="normal" officeooo:rsid="0140e6b2" style:font-weight-asian="normal" style:font-name-complex="Carlito" style:font-weight-complex="normal"/>
    </style:style>
    <style:style style:name="T102" style:family="text">
      <style:text-properties fo:font-weight="normal" officeooo:rsid="08921c54" style:font-weight-asian="normal" style:font-name-complex="Carlito" style:font-weight-complex="normal"/>
    </style:style>
    <style:style style:name="T103" style:family="text">
      <style:text-properties officeooo:rsid="00787774" style:font-name-complex="Carlito"/>
    </style:style>
    <style:style style:name="T104" style:family="text">
      <style:text-properties fo:font-weight="bold" officeooo:rsid="00787774" style:font-weight-asian="bold" style:font-name-complex="Carlito" style:font-weight-complex="bold"/>
    </style:style>
    <style:style style:name="T105" style:family="text">
      <style:text-properties fo:font-weight="normal" officeooo:rsid="00787774" style:font-weight-asian="normal" style:font-name-complex="Carlito" style:font-weight-complex="normal"/>
    </style:style>
    <style:style style:name="T106" style:family="text">
      <style:text-properties fo:font-weight="normal" officeooo:rsid="013b2651" style:font-weight-asian="normal" style:font-name-complex="Carlito" style:font-weight-complex="normal"/>
    </style:style>
    <style:style style:name="T107" style:family="text">
      <style:text-properties fo:font-weight="normal" officeooo:rsid="01f7e147" style:font-weight-asian="normal" style:font-name-complex="Carlito" style:font-weight-complex="normal"/>
    </style:style>
    <style:style style:name="T108" style:family="text">
      <style:text-properties officeooo:rsid="014999d8" style:font-name-complex="Carlito"/>
    </style:style>
    <style:style style:name="T109" style:family="text">
      <style:text-properties officeooo:rsid="014bcd92" style:font-name-complex="Carlito"/>
    </style:style>
    <style:style style:name="T110" style:family="text">
      <style:text-properties officeooo:rsid="00c699ae" style:font-name-complex="Carlito"/>
    </style:style>
    <style:style style:name="T111" style:family="text">
      <style:text-properties officeooo:rsid="0158cd1b" style:font-name-complex="Carlito"/>
    </style:style>
    <style:style style:name="T112" style:family="text">
      <style:text-properties officeooo:rsid="01599d11" style:font-name-complex="Carlito"/>
    </style:style>
    <style:style style:name="T113" style:family="text">
      <style:text-properties officeooo:rsid="01f88e64" style:font-name-complex="Carlito"/>
    </style:style>
    <style:style style:name="T114" style:family="text">
      <style:text-properties officeooo:rsid="03cc00fc" style:font-name-complex="Carlito"/>
    </style:style>
    <style:style style:name="T115" style:family="text">
      <style:text-properties officeooo:rsid="004e5c25"/>
    </style:style>
    <style:style style:name="T116" style:family="text">
      <style:text-properties officeooo:rsid="004a57a9"/>
    </style:style>
    <style:style style:name="T117" style:family="text">
      <style:text-properties officeooo:rsid="004fa102"/>
    </style:style>
    <style:style style:name="T118" style:family="text">
      <style:text-properties officeooo:rsid="0082f392"/>
    </style:style>
    <style:style style:name="T119" style:family="text">
      <style:text-properties fo:font-weight="bold" officeooo:rsid="004e5c25" style:font-weight-asian="bold" style:font-weight-complex="bold"/>
    </style:style>
    <style:style style:name="T120" style:family="text">
      <style:text-properties officeooo:rsid="00504692" style:font-name-complex="Carlito"/>
    </style:style>
    <style:style style:name="T121" style:family="text">
      <style:text-properties officeooo:rsid="003b685d" style:font-name-complex="Carlito"/>
    </style:style>
    <style:style style:name="T122" style:family="text">
      <style:text-properties officeooo:rsid="004ac594" style:font-name-complex="Carlito"/>
    </style:style>
    <style:style style:name="T123" style:family="text">
      <style:text-properties officeooo:rsid="0060e9ba" style:font-name-complex="Carlito"/>
    </style:style>
    <style:style style:name="T124" style:family="text">
      <style:text-properties officeooo:rsid="00624571" style:font-name-complex="Carlito"/>
    </style:style>
    <style:style style:name="T125" style:family="text">
      <style:text-properties style:font-name="Liberation Sans" fo:font-size="12pt" officeooo:rsid="004db3c2" style:font-size-asian="12pt" style:font-name-complex="Carlito" style:font-size-complex="12pt"/>
    </style:style>
    <style:style style:name="T126" style:family="text">
      <style:text-properties style:font-name="Liberation Sans" fo:font-size="12pt" fo:font-weight="bold" officeooo:rsid="004db3c2" style:font-size-asian="12pt" style:font-weight-asian="bold" style:font-name-complex="Carlito" style:font-size-complex="12pt" style:font-weight-complex="bold"/>
    </style:style>
    <style:style style:name="T127" style:family="text">
      <style:text-properties fo:color="#127622" loext:opacity="100%" style:font-name="Liberation Sans" fo:font-size="12pt" officeooo:rsid="004db3c2" style:font-size-asian="12pt" style:font-name-complex="Carlito" style:font-size-complex="12pt"/>
    </style:style>
    <style:style style:name="T128" style:family="text">
      <style:text-properties style:font-name="Liberation Sans" fo:font-size="12pt" officeooo:rsid="0052e52f" style:font-size-asian="12pt" style:font-name-complex="Carlito" style:font-size-complex="12pt"/>
    </style:style>
    <style:style style:name="T129" style:family="text">
      <style:text-properties style:font-name="Liberation Sans" fo:font-size="12pt" officeooo:rsid="005318e9" style:font-size-asian="12pt" style:font-name-complex="Carlito" style:font-size-complex="12pt"/>
    </style:style>
    <style:style style:name="T130" style:family="text">
      <style:text-properties style:font-name="Liberation Sans" fo:font-size="12pt" fo:font-weight="bold" officeooo:rsid="005318e9" style:font-size-asian="12pt" style:font-weight-asian="bold" style:font-name-complex="Carlito" style:font-size-complex="12pt" style:font-weight-complex="bold"/>
    </style:style>
    <style:style style:name="T131" style:family="text">
      <style:text-properties fo:color="#158466" loext:opacity="100%"/>
    </style:style>
    <style:style style:name="T132" style:family="text">
      <style:text-properties style:font-name="Liberation Sans" fo:font-size="12pt" fo:font-style="italic" officeooo:rsid="004db3c2" style:font-size-asian="12pt" style:font-style-asian="italic" style:font-name-complex="Carlito" style:font-size-complex="12pt" style:font-style-complex="italic"/>
    </style:style>
    <style:style style:name="T133" style:family="text">
      <style:text-properties officeooo:rsid="006cb83e"/>
    </style:style>
    <style:style style:name="T134" style:family="text">
      <style:text-properties fo:color="#ff4000" loext:opacity="100%" officeooo:rsid="00598cc4"/>
    </style:style>
    <style:style style:name="T135" style:family="text">
      <style:text-properties fo:font-style="italic" style:font-style-asian="italic" style:font-style-complex="italic"/>
    </style:style>
    <style:style style:name="T136" style:family="text">
      <style:text-properties officeooo:rsid="005b82f6"/>
    </style:style>
    <style:style style:name="T137" style:family="text">
      <style:text-properties fo:font-style="italic" officeooo:rsid="005b82f6" style:font-style-asian="italic" style:font-style-complex="italic"/>
    </style:style>
    <style:style style:name="T138" style:family="text">
      <style:text-properties fo:color="#ff4000" loext:opacity="100%" fo:font-weight="bold" officeooo:rsid="00598cc4" style:font-weight-asian="bold" style:font-weight-complex="bold"/>
    </style:style>
    <style:style style:name="T139" style:family="text">
      <style:text-properties fo:color="#ff4000" loext:opacity="100%" officeooo:rsid="00598cc4" style:font-name-complex="Carlito"/>
    </style:style>
    <style:style style:name="T140" style:family="text">
      <style:text-properties officeooo:rsid="00598cc4"/>
    </style:style>
    <style:style style:name="T141" style:family="text">
      <style:text-properties officeooo:rsid="006d85ad"/>
    </style:style>
    <style:style style:name="T142" style:family="text">
      <style:text-properties officeooo:rsid="006ea1c1"/>
    </style:style>
    <style:style style:name="T143" style:family="text">
      <style:text-properties officeooo:rsid="006ec91e"/>
    </style:style>
    <style:style style:name="T144" style:family="text">
      <style:text-properties fo:color="#158466" loext:opacity="100%" officeooo:rsid="006ff805"/>
    </style:style>
    <style:style style:name="T145" style:family="text">
      <style:text-properties fo:color="#158466" loext:opacity="100%" officeooo:rsid="00868b16"/>
    </style:style>
    <style:style style:name="T146" style:family="text">
      <style:text-properties officeooo:rsid="006ff805"/>
    </style:style>
    <style:style style:name="T147" style:family="text">
      <style:text-properties fo:color="#158466" loext:opacity="100%" officeooo:rsid="006ec91e"/>
    </style:style>
    <style:style style:name="T148" style:family="text">
      <style:text-properties officeooo:rsid="005bc313"/>
    </style:style>
    <style:style style:name="T149" style:family="text">
      <style:text-properties officeooo:rsid="005e2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re is Paradise?</text:p>
      <text:p text:style-name="P2"/>
      <text:p text:style-name="P3"><text:span text:style-name="T1">Many commentators, tradition, and even good preachers will tell you that “</text:span><text:span text:style-name="T2">paradise</text:span><text:span text:style-name="T1">” is the same as “</text:span><text:span text:style-name="T2">Abraham’s bosom</text:span><text:span text:style-name="T1">”</text:span><text:span text:style-name="T3">. </text:span><text:span text:style-name="T1">But, </text:span><text:span text:style-name="T4">w</text:span><text:span text:style-name="T5">hat is that conclusion based on </text:span><text:span text:style-name="T4">and </text:span><text:span text:style-name="T1">how did they come to that conclusion? </text:span><text:span text:style-name="T6">Let’s have a look at what the Bible says.</text:span></text:p>
      <text:p text:style-name="P4"/>
      <text:p text:style-name="P5"><text:span text:style-name="T1">Abraham’s bosom is mentioned only twice in the </text:span><text:span text:style-name="T7">entire </text:span><text:span text:style-name="T1">Bible and they both appear in </text:span><text:span text:style-name="T8">Luke 16</text:span><text:span text:style-name="T1">.</text:span></text:p>
      <text:p text:style-name="P6"/>
      <table:table table:name="Table1" table:style-name="Table1">
        <table:table-column table:style-name="Table1.A"/>
        <table:table-row>
          <table:table-cell table:style-name="Table1.A1" office:value-type="string">
            <text:p text:style-name="P7"><text:span text:style-name="T9">Luke 16:19-31</text:span><text:line-break/><text:span text:style-name="T10">19</text:span> <text:span text:style-name="T11">There was a certain rich man, which was clothed in purple and fine linen, and fared sumptuously every day:</text:span> <text:span text:style-name="T10">20</text:span> <text:span text:style-name="T11">And there was a certain beggar named Lazarus, which was laid at his gate, full of sores,</text:span></text:p>
            <text:p text:style-name="P7"><text:span text:style-name="T10">21</text:span> <text:span text:style-name="T11">And desiring to be fed with the crumbs which fell from the rich man's table: moreover the dogs came and licked his sores.</text:span></text:p>
            <text:p text:style-name="P7"><text:span text:style-name="T10">22</text:span> <text:span text:style-name="T11">And it came to pass, that the beggar died, and was carried by the angels into </text:span><text:span text:style-name="T12">Abraham's bosom</text:span><text:span text:style-name="T11">: the rich man also died, and was buried;</text:span></text:p>
            <text:p text:style-name="P7"><text:span text:style-name="T10">23</text:span> <text:span text:style-name="T11">And in </text:span><text:span text:style-name="T12">hell</text:span><text:span text:style-name="T11"> he lift up his eyes, being in torments, and seeth </text:span><text:span text:style-name="T12">Abraham</text:span><text:span text:style-name="T11"> afar off, and </text:span><text:span text:style-name="T12">Lazarus in his bosom</text:span><text:span text:style-name="T11">.</text:span></text:p>
            <text:p text:style-name="P7"><text:span text:style-name="T10">24</text:span> <text:span text:style-name="T11">And he cried and said, Father Abraham, have mercy on me, and send Lazarus, that he may dip the tip of his finger in water, and cool my tongue; for I am tormented in this flame.</text:span></text:p>
            <text:p text:style-name="P7"><text:span text:style-name="T10">25</text:span> <text:span text:style-name="T11">But Abraham said, Son, remember that thou in thy lifetime receivedst thy good things, and likewise Lazarus evil things: but now he is </text:span><text:span text:style-name="T13">comforted</text:span><text:span text:style-name="T11">, and thou art </text:span><text:span text:style-name="T13">tormented</text:span><text:span text:style-name="T11">.</text:span></text:p>
            <text:p text:style-name="P7"><text:span text:style-name="T10">26</text:span> <text:span text:style-name="T11">And beside all this, between us and you there is a great gulf fixed: so that they which would pass from hence to you cannot; neither can they pass to us, that would come from thence.</text:span></text:p>
            <text:p text:style-name="P7"><text:span text:style-name="T10">27</text:span> <text:span text:style-name="T11">Then he said, I pray thee therefore, father, that thou wouldest send him to my father's house:</text:span></text:p>
            <text:p text:style-name="P7"><text:span text:style-name="T10">28</text:span> <text:span text:style-name="T11">For I have five brethren; that he may testify unto them, lest they also come into this place of torment.</text:span></text:p>
            <text:p text:style-name="P7"><text:span text:style-name="T10">29</text:span> <text:span text:style-name="T11">Abraham saith unto him, They have Moses and the prophets; let them hear them.</text:span></text:p>
            <text:p text:style-name="P7"><text:span text:style-name="T10">30</text:span> <text:span text:style-name="T11">And he said, Nay, father Abraham: but if one went unto them from the dead, they will repent.</text:span></text:p>
            <text:p text:style-name="P7"><text:span text:style-name="T10">31</text:span> <text:span text:style-name="T11">And he said unto him, If they hear not Moses and the prophets, neither will they be persuaded, though one rose from the dead.</text:span></text:p>
          </table:table-cell>
        </table:table-row>
      </table:table>
      <text:p text:style-name="P8"/>
      <text:p text:style-name="P9"><text:span text:style-name="T14">The only definition we’re given from the context is that “Abraham’s bosom” is also the </text:span><text:span text:style-name="T15">same place as the </text:span><text:span text:style-name="T14">“comfort side of hell” </text:span><text:span text:style-name="T16">(which means that Abraham’s bosom </text:span><text:span text:style-name="T17">is in</text:span><text:span text:style-name="T16"> hell)</text:span><text:span text:style-name="T14">. </text:span><text:span text:style-name="T18">Keep that in mind as we look at every usage of the word “paradise” below.</text:span></text:p>
      <text:p text:style-name="P9"/>
      <text:p text:style-name="P9"><text:span text:style-name="T19">Likewise, the “torment side of hell” is the place that most people colloquially refer to as “hell” without realizing that before Jesus’ death, burial, and resurrection </text:span><text:span text:style-name="T20">everyone</text:span><text:span text:style-name="T19"> went to “hell” (AKA “the grave” </text:span><text:span text:style-name="T21">Gen 37:35</text:span><text:span text:style-name="T19">, “the pit” </text:span><text:span text:style-name="T21">Num 16:30</text:span><text:span text:style-name="T19">, </text:span><text:span text:style-name="T22">and “hell” </text:span><text:span text:style-name="T23">Deu 32:22</text:span><text:span text:style-name="T22"> in the OT).</text:span></text:p>
      <text:p text:style-name="P10"/>
      <text:p text:style-name="P11">Summary:</text:p>
      <text:p text:style-name="P11"/>
      <text:list text:style-name="L1">
        <text:list-item>
          <text:p text:style-name="P12">There’s <text:span text:style-name="T24">no</text:span> direct connection</text:p>
          <text:list>
            <text:list-item>
              <text:p text:style-name="P13"><text:span text:style-name="T25">Gen</text:span><text:span text:style-name="T26">esis</text:span><text:span text:style-name="T25"> 1:8</text:span><text:span text:style-name="T27"> “firmament” = “heaven”</text:span></text:p>
            </text:list-item>
            <text:list-item>
              <text:p text:style-name="P14"><text:span text:style-name="T9">John 11:11-14</text:span> (sometimes) “sleep” = “dead”</text:p>
            </text:list-item>
          </text:list>
        </text:list-item>
        <text:list-item>
          <text:p text:style-name="P13"><text:span text:style-name="T28">T</text:span><text:span text:style-name="T27">here’s </text:span><text:span text:style-name="T29">no</text:span><text:span text:style-name="T27"> parallelism</text:span></text:p>
          <text:list>
            <text:list-item>
              <text:p text:style-name="P13"><text:span text:style-name="T25">J</text:span><text:span text:style-name="T26">udges</text:span><text:span text:style-name="T25"> 18:17-20</text:span><text:span text:style-name="T27"> “graven” = “carved”</text:span></text:p>
            </text:list-item>
            <text:list-item>
              <text:p text:style-name="P13"><text:span text:style-name="T25">1 Sa</text:span><text:span text:style-name="T30">muel</text:span><text:span text:style-name="T25"> 20:24-27</text:span><text:span text:style-name="T27"> “new moon” = “first day of the month”</text:span></text:p>
            </text:list-item>
          </text:list>
        </text:list-item>
      </text:list>
      <text:p text:style-name="P15"/>
      <text:p text:style-name="P16"/>
      <text:p text:style-name="P6"/>
      <text:p text:style-name="P6"/>
      <text:p text:style-name="P6"/>
      <text:p text:style-name="P6"/>
      <text:p text:style-name="P6"/>
      <text:p text:style-name="P17"><text:soft-page-break/><text:span text:style-name="T31">The word </text:span><text:span text:style-name="T32">“</text:span><text:span text:style-name="T33">p</text:span><text:span text:style-name="T34">aradise” appears </text:span><text:span text:style-name="T35">three</text:span><text:span text:style-name="T34"> times </text:span><text:span text:style-name="T36">in the entire Bible</text:span><text:span text:style-name="T34"> (</text:span><text:span text:style-name="T37">Luke 23:43</text:span><text:span text:style-name="T34">, </text:span><text:span text:style-name="T37">2 Corinthians 12:4</text:span><text:span text:style-name="T34">, </text:span><text:span text:style-name="T37">Revelation 2:7</text:span><text:span text:style-name="T34">).</text:span></text:p>
      <text:p text:style-name="P18"/>
      <table:table table:name="Table6" table:style-name="Table6">
        <table:table-column table:style-name="Table6.A"/>
        <table:table-row>
          <table:table-cell table:style-name="Table6.A1" office:value-type="string">
            <text:p text:style-name="P19"><text:span text:style-name="T37">Luke 23:43</text:span><text:span text:style-name="T38"><text:line-break/>And Jesus said unto him, </text:span><text:span text:style-name="T39">Verily I say unto thee, To day</text:span><text:span text:style-name="T40">G4594</text:span><text:span text:style-name="T39"> shalt thou be with me in </text:span><text:span text:style-name="T41">paradise</text:span><text:span text:style-name="T42">G3857</text:span><text:span text:style-name="T38">.</text:span></text:p>
          </table:table-cell>
        </table:table-row>
      </table:table>
      <text:list text:style-name="L2">
        <text:list-item>
          <text:p text:style-name="P20">To the penitent thief on the cross beside Jesus it was promised that <text:span text:style-name="T43">that day</text:span> he would be in “paradise” with Jesus.</text:p>
          <text:list>
            <text:list-item>
              <text:p text:style-name="P21"><text:span text:style-name="T44">When He said “to day” He very specifically meant “this day” </text:span><text:span text:style-name="T45">(</text:span><text:span text:style-name="T46">the </text:span><text:span text:style-name="T47">evening and the morning</text:span><text:span text:style-name="T45">): </text:span><text:span text:style-name="T44">not a day </text:span><text:span text:style-name="T48">as </text:span><text:span text:style-name="T49">in the </text:span><text:span text:style-name="T50">unspecified </text:span><text:span text:style-name="T49">sense such </text:span><text:span text:style-name="T44">as in </text:span><text:span text:style-name="T37">Joel 2:31</text:span><text:span text:style-name="T51">, the continual </text:span><text:span text:style-name="T52">(daily) </text:span><text:span text:style-name="T51">sense such as in </text:span><text:span text:style-name="T37">Exodus 13:21</text:span><text:span text:style-name="T51">, the </text:span><text:span text:style-name="T50">monthly (new moon) sense as in </text:span><text:span text:style-name="T37">Genesis 8:5</text:span><text:span text:style-name="T50">, </text:span><text:span text:style-name="T48">or </text:span><text:span text:style-name="T53">the dawn (first light in the morning) as in </text:span><text:span text:style-name="T37">Genesis 32:24</text:span><text:span text:style-name="T48">.</text:span></text:p>
            </text:list-item>
          </text:list>
        </text:list-item>
        <text:list-item>
          <text:p text:style-name="P21"><text:span text:style-name="T54">Since Jesus descended into </text:span><text:span text:style-name="T55">the lower parts of the earth </text:span><text:span text:style-name="T54">where all the dead </text:span><text:span text:style-name="T55">previously went, it makes sense that some might equate the comfort side of hell to paradise </text:span><text:span text:style-name="T56">if you isolate this verse</text:span><text:span text:style-name="T57"> </text:span><text:span text:style-name="T56">by itself</text:span><text:span text:style-name="T58">. </text:span><text:span text:style-name="T59">However, </text:span><text:span text:style-name="T60">when considering the implications of that in light of all of scripture, </text:span><text:span text:style-name="T61">cracks begin to form immediately</text:span><text:span text:style-name="T59">. </text:span><text:span text:style-name="T62">For example: T</text:span><text:span text:style-name="T63">hose that were in the comfort side of hell were </text:span><text:span text:style-name="T64">brought to</text:span><text:span text:style-name="T63"> God. </text:span><text:span text:style-name="T65">The</text:span><text:span text:style-name="T59"> ransom was paid </text:span><text:span text:style-name="T66">and</text:span><text:span text:style-name="T59"> they were </text:span><text:span text:style-name="T67">bought </text:span><text:span text:style-name="T68">back</text:span><text:span text:style-name="T59">. </text:span><text:span text:style-name="T69">These concepts from scripture necessitate a separation from God. </text:span><text:span text:style-name="T62">I</text:span><text:span text:style-name="T63">f the comfort side of hell was </text:span><text:span text:style-name="T70">the same place as </text:span><text:span text:style-name="T63">paradise </text:span><text:span text:style-name="T59">then God’</text:span><text:span text:style-name="T71">s abode</text:span><text:span text:style-name="T59"> would have already been there </text:span><text:span text:style-name="T72">and there would be no need to </text:span><text:span text:style-name="T73">bring them</text:span><text:span text:style-name="T72"> to God.</text:span></text:p>
        </text:list-item>
      </text:list>
      <text:p text:style-name="P22"/>
      <text:p text:style-name="P22"/>
      <table:table table:name="Table7" table:style-name="Table7">
        <table:table-column table:style-name="Table7.A"/>
        <table:table-row>
          <table:table-cell table:style-name="Table7.A1" office:value-type="string">
            <text:p text:style-name="P19"><text:span text:style-name="T37">2 Corinthians 12:1-4</text:span><text:span text:style-name="T38"><text:line-break/></text:span><text:span text:style-name="T74">1</text:span><text:span text:style-name="T38"> It is not expedient for me doubtless to glory. I will come to </text:span><text:span text:style-name="T75">visions and revelations of the Lord</text:span><text:span text:style-name="T38">. <text:line-break/></text:span><text:span text:style-name="T74">2</text:span><text:span text:style-name="T38"> I knew a man in Christ above fourteen years ago, (whether in the body, I cannot tell; or whether out of the body, I cannot tell: God knoweth;) such an one </text:span><text:span text:style-name="T76">caught up to the third heaven</text:span><text:span text:style-name="T38">. <text:line-break/></text:span><text:span text:style-name="T74">3</text:span><text:span text:style-name="T38"> And I knew such a man, (whether in the body, or out of the body, I cannot tell: God knoweth;) <text:line-break/></text:span><text:span text:style-name="T74">4</text:span><text:span text:style-name="T38"> How that he was </text:span><text:span text:style-name="T76">caught up into paradise</text:span><text:span text:style-name="T77">G3857</text:span><text:span text:style-name="T38">, and heard unspeakable words, which it is not lawful for a man to utter.<text:line-break/></text:span><text:span text:style-name="T78">5</text:span><text:span text:style-name="T38"> </text:span><text:span text:style-name="T75">Of such an one will I glory</text:span><text:span text:style-name="T38">: yet of myself I will not glory, but in mine infirmities.</text:span></text:p>
          </table:table-cell>
        </table:table-row>
      </table:table>
      <text:list text:style-name="L3">
        <text:list-item>
          <text:p text:style-name="P23"><text:span text:style-name="T79">The same place is referred to by two different names: </text:span>“paradise” <text:span text:style-name="T79">and “</text:span>the third heaven”.</text:p>
        </text:list-item>
        <text:list-item>
          <text:p text:style-name="P23"><text:span text:style-name="T80">If paradise was the comfort side of hell we would expect to see hell</text:span><text:span text:style-name="T81">G86</text:span><text:span text:style-name="T80"> </text:span><text:span text:style-name="T82">(or an equivalent word or phrase)</text:span><text:span text:style-name="T80"> here instead of “the third heaven”. </text:span><text:span text:style-name="T83">I</text:span><text:span text:style-name="T84">nstead, </text:span><text:span text:style-name="T85">we see a phrase that is not only new but also entirely unique </text:span><text:span text:style-name="T86">(which also means that the</text:span><text:span text:style-name="T87">re is </text:span><text:span text:style-name="T88">one</text:span><text:span text:style-name="T86"> definition </text:span><text:span text:style-name="T87">for </text:span><text:span text:style-name="T86">“</text:span><text:span text:style-name="T87">the </text:span><text:span text:style-name="T86">third heaven” </text:span><text:span text:style-name="T87">and that </text:span><text:span text:style-name="T86">is “paradise”)</text:span><text:span text:style-name="T85">.</text:span></text:p>
        </text:list-item>
        <text:list-item>
          <text:p text:style-name="P24"><text:span text:style-name="T89">We are only to glory in the Lord (</text:span><text:span text:style-name="T37">Jeremiah 9:23,24</text:span><text:span text:style-name="T89">, </text:span><text:span text:style-name="T37">1 Corinthians 1:31, 3:21</text:span><text:span text:style-name="T90">, </text:span><text:span text:style-name="T37">2 Corinthians 10:17</text:span><text:span text:style-name="T89">) so </text:span><text:span text:style-name="T91">then </text:span><text:span text:style-name="T89">v</text:span><text:span text:style-name="T37">5a</text:span><text:span text:style-name="T89"> </text:span><text:span text:style-name="T92">refers to the Lord. </text:span><text:span text:style-name="T93">Wherever this third heaven/paradise is, the Lord is also there </text:span><text:span text:style-name="T94">(</text:span><text:span text:style-name="T95">Mark 16:19, </text:span><text:span text:style-name="T96">Hebrews 10:12</text:span><text:span text:style-name="T94">).</text:span></text:p>
        </text:list-item>
      </text:list>
      <text:p text:style-name="P25"/>
      <text:p text:style-name="P25"/>
      <table:table table:name="Table8" table:style-name="Table8">
        <table:table-column table:style-name="Table8.A"/>
        <table:table-row>
          <table:table-cell table:style-name="Table8.A1" office:value-type="string">
            <text:p text:style-name="P19"><text:span text:style-name="T37">Revelation 2:7</text:span><text:span text:style-name="T38"><text:line-break/></text:span><text:span text:style-name="T39">He that hath an ear, let him hear what the Spirit saith unto the churches; To him that overcometh</text:span><text:span text:style-name="T38"> </text:span><text:span text:style-name="T39">will </text:span><text:span text:style-name="T41">I give</text:span><text:span text:style-name="T39"> to eat of the </text:span><text:span text:style-name="T41">tree of life</text:span><text:span text:style-name="T39">, which is in the midst of the </text:span><text:span text:style-name="T41">paradise</text:span><text:span text:style-name="T77">G3857</text:span><text:span text:style-name="T38"> </text:span><text:span text:style-name="T41">of God</text:span><text:span text:style-name="T38">.</text:span></text:p>
            <text:p text:style-name="P19"><text:span text:style-name="T38"><text:line-break/></text:span><text:span text:style-name="T37">Revelation 22:1-2</text:span><text:span text:style-name="T38"><text:line-break/></text:span><text:span text:style-name="T74">1</text:span><text:span text:style-name="T38"> And he shewed me a pure river of water of life, clear as crystal, proceeding out of </text:span><text:span text:style-name="T97">the </text:span><text:span text:style-name="T75">throne of God and of the Lamb</text:span><text:span text:style-name="T38">. <text:line-break/></text:span><text:span text:style-name="T74">2</text:span><text:span text:style-name="T38"> In the midst of the street of it, and on either side of the river, </text:span><text:span text:style-name="T98">was there</text:span><text:span text:style-name="T38"> the </text:span><text:span text:style-name="T75">tree of life</text:span><text:span text:style-name="T38">, which bare twelve </text:span><text:span text:style-name="T98">manner of</text:span><text:span text:style-name="T38"> fruits, </text:span><text:span text:style-name="T98">and</text:span><text:span text:style-name="T38"> yielded her fruit every month: and the leaves of the tree </text:span><text:span text:style-name="T98">were</text:span><text:span text:style-name="T38"> for the healing of the nations.</text:span></text:p>
          </table:table-cell>
        </table:table-row>
      </table:table>
      <text:list text:style-name="L4">
        <text:list-item>
          <text:p text:style-name="P26"><text:span text:style-name="T99">T</text:span><text:span text:style-name="T100">he tree of life is in the middle of the garden </text:span><text:span text:style-name="T99">planted by the LORD</text:span><text:span text:style-name="T100"> God</text:span><text:span text:style-name="T101"> in </text:span><text:span text:style-name="T37">Genesis 2:8,9</text:span><text:span text:style-name="T100">. </text:span><text:span text:style-name="T102">It is </text:span><text:span text:style-name="T103">in the middle of the </text:span><text:span text:style-name="T104">paradise</text:span><text:span text:style-name="T105"> of God </text:span><text:span text:style-name="T101">in </text:span><text:span text:style-name="T37">Revelation 2:7</text:span><text:span text:style-name="T101">. </text:span><text:span text:style-name="T106">After the new heaven and </text:span><text:span text:style-name="T107">new </text:span><text:span text:style-name="T106">earth is created (</text:span><text:span text:style-name="T37">Revelation 21</text:span><text:span text:style-name="T106">) the tree of life </text:span><text:span text:style-name="T103">is </text:span><text:span text:style-name="T108">in</text:span><text:span text:style-name="T103"> the middle </text:span><text:span text:style-name="T109">of </text:span><text:span text:style-name="T103">and on both sides of the </text:span><text:span text:style-name="T109">pure </text:span><text:span text:style-name="T103">river </text:span><text:span text:style-name="T109">of water of life</text:span><text:span text:style-name="T110">. </text:span><text:span text:style-name="T111">None of these </text:span><text:span text:style-name="T112">appear to be </text:span><text:span text:style-name="T111">anywhere near</text:span><text:span text:style-name="T113"> </text:span><text:span text:style-name="T114">the comfort side of hell</text:span><text:span text:style-name="T113">.</text:span></text:p>
        </text:list-item>
      </text:list>
      <text:p text:style-name="P27"/>
      <text:p text:style-name="P27"/>
      <text:p text:style-name="P28"><text:soft-page-break/><text:span text:style-name="T115">J</text:span><text:span text:style-name="T116">ust like we saw above, none of these verses </text:span><text:span text:style-name="T115">tell us that</text:span><text:span text:style-name="T116"> “Abraham’s bosom” </text:span><text:span text:style-name="T115">is also</text:span><text:span text:style-name="T116"> “paradise” </text:span><text:span text:style-name="T115">and they all appear to be talking about one single place. </text:span><text:span text:style-name="T117">I</text:span><text:span text:style-name="T115">f Abraham’s bosom and paradise were the same place then one of </text:span><text:span text:style-name="T117">the usages of “paradise” above w</text:span><text:span text:style-name="T115">ould </text:span><text:span text:style-name="T118">necessarily </text:span><text:span text:style-name="T115">have a different definition than the other two </text:span><text:span text:style-name="T119">with no scriptural evidence to back that up</text:span><text:span text:style-name="T115">.</text:span></text:p>
      <text:p text:style-name="P28"/>
      <text:p text:style-name="P29"><text:span text:style-name="T120">So if</text:span><text:span text:style-name="T27"> </text:span><text:span text:style-name="T120">the idea of </text:span><text:span text:style-name="T27">“paradise” </text:span><text:span text:style-name="T120">being</text:span><text:span text:style-name="T27"> the same place as “Abraham’s bosom”</text:span><text:span text:style-name="T121"> </text:span><text:span text:style-name="T120">did not</text:span><text:span text:style-name="T122"> originate from the Bible, </text:span><text:span text:style-name="T123">as the evidence </text:span><text:span text:style-name="T124">clearly </text:span><text:span text:style-name="T123">suggests, </text:span><text:span text:style-name="T120">that</text:span><text:span text:style-name="T122"> begs the question: where did it come from?</text:span></text:p>
      <text:p text:style-name="P30"/>
      <text:list xml:id="list3041928986" text:style-name="L5">
        <text:list-item>
          <text:p text:style-name="P31"><text:span text:style-name="T24">The Jewish Roots</text:span> (2nd Century B.C. – 1st Century A.D.)</text:p>
        </text:list-item>
      </text:list>
      <text:list text:style-name="L6">
        <text:list-item>
          <text:list>
            <text:list-item>
              <text:p text:style-name="P32"><text:span text:style-name="T125">In </text:span><text:span text:style-name="T126">Jewish</text:span><text:span text:style-name="T125"> thought, being in the “bosom” of a patriarch was a metaphor for the highest place of honor at a banquet (</text:span><text:span text:style-name="T127">John 13:23</text:span><text:span text:style-name="T125">). Non-canonical works like “4 Maccabees” (13:17) and the “Apocalypse of Zephaniah” describe the righteous </text:span><text:span text:style-name="T128">being received by Abraham, Isaac, and Jacob. </text:span><text:span text:style-name="T129">During that same time period “Abraham’s bosom” and “paradise” began to be used to describe the “righteous compartment” of Sheol </text:span><text:span text:style-name="T130">as a cultural idiom</text:span> (<text:span text:style-name="T131">Mark 7:7</text:span>).</text:p>
            </text:list-item>
          </text:list>
        </text:list-item>
      </text:list>
      <text:list xml:id="list123018718937595" text:continue-list="list3041928986" text:style-name="L5">
        <text:list-item>
          <text:p text:style-name="P33"><text:span text:style-name="T24">Early Church Fathers</text:span> (2nd – 3rd Century A.D.)</text:p>
        </text:list-item>
      </text:list>
      <text:list text:style-name="L7">
        <text:list-item>
          <text:list>
            <text:list-item>
              <text:p text:style-name="P34">The formal propagation of this idea among Christians began with the early theologians who sought to map out the afterlife.</text:p>
              <text:list>
                <text:list-item>
                  <text:p text:style-name="P35"><text:span text:style-name="T126">Tertullian</text:span><text:span text:style-name="T125"> (c. 160–225 A.D.): In his work </text:span><text:span text:style-name="T132">Against Marcion</text:span><text:span text:style-name="T125"> (Book IV, chapter 34), Tertullian explicitly calls Abraham’s bosom a "temporary receptacle" for the faithful. </text:span>He distinguished it from the highest Heaven <text:span text:style-name="T133">but</text:span> <text:span text:style-name="T125">he helped bridge the gap by describing it as a place of "refreshment."</text:span></text:p>
                  <text:list>
                    <text:list-item>
                      <text:p text:style-name="P36">Tertullian argued that no human—not even the righteous—enters the highest heaven or the presence of God <text:span text:style-name="T24">until after</text:span> the resurrection and the <text:span text:style-name="T24">final judgment</text:span><text:span text:style-name="T134">*</text:span>.</text:p>
                    </text:list-item>
                  </text:list>
                </text:list-item>
                <text:list-item>
                  <text:p text:style-name="P34"><text:span text:style-name="T24">Hippolytus</text:span> of Rome (c. 170–235 A.D.): In his <text:span text:style-name="T135">Against Plato, on the Cause of the Universe</text:span>, he describes Hades as having a "locality" for the righteous called Abraham’s Bosom, which he characterizes as a place of light and "perpetual flowers"—language almost identical to the classical Greek and Jewish descriptions of Paradise.</text:p>
                </text:list-item>
              </text:list>
            </text:list-item>
          </text:list>
        </text:list-item>
      </text:list>
      <text:list xml:id="list123017107475446" text:continue-list="list123018718937595" text:style-name="L5">
        <text:list-item>
          <text:p text:style-name="P33"><text:span text:style-name="T24">The Roman Catholic Consolidation</text:span> (Middle Ages)</text:p>
        </text:list-item>
      </text:list>
      <text:list text:style-name="L8">
        <text:list-item>
          <text:list>
            <text:list-item>
              <text:p text:style-name="P37">“<text:span text:style-name="T136">Limbo of the Fathers” (</text:span><text:span text:style-name="T137">Limbus Patrum</text:span><text:span text:style-name="T136">)</text:span></text:p>
              <text:list>
                <text:list-item>
                  <text:p text:style-name="P37"><text:span text:style-name="T24">The Roman Catholic Church</text:span> taught that the righteous who died before Christ (the Old Testament saints) were held in a place of rest.</text:p>
                </text:list-item>
                <text:list-item>
                  <text:p text:style-name="P38">They officially identified this "Limbo" as being Abraham’s Bosom. To make the theology consistent, they taught that when Jesus told the thief on the cross, "To day shalt thou be with me in paradise," <text:span text:style-name="T24">He was referring to this same "Limbo" or "Bosom" where He would descend after death</text:span><text:span text:style-name="T138">**</text:span>.</text:p>
                </text:list-item>
                <text:list-item>
                  <text:p text:style-name="P38">By the time of the Renaissance, the two terms were treated as synonyms in nearly all ecclesiastical art and commentary.</text:p>
                </text:list-item>
              </text:list>
            </text:list-item>
          </text:list>
        </text:list-item>
      </text:list>
      <text:list text:continue-list="list123017107475446" text:style-name="L5">
        <text:list-item>
          <text:p text:style-name="P39">The Propagation into Modern Theology</text:p>
        </text:list-item>
      </text:list>
      <text:list text:style-name="L9">
        <text:list-item>
          <text:list>
            <text:list-item>
              <text:p text:style-name="P40">Post-Reformation, many commentators continued to carry this tradition forward:</text:p>
              <text:list>
                <text:list-item>
                  <text:p text:style-name="P40"><text:span text:style-name="T24">Maldonatus</text:span> (1583): A <text:span text:style-name="T24">Jesuit</text:span> commentator whose work heavily influenced later scholars, <text:span text:style-name="T24">he argued</text:span> that "Abraham's Bosom" was simply a Jewish metaphor for "Paradise."</text:p>
                </text:list-item>
                <text:list-item>
                  <text:p text:style-name="P40"><text:span text:style-name="T24">Modern Study Bibles</text:span>: Many modern notes in the margins of non-KJV Bibles (like the Scofield or various study editions) continue this lineage by stating as a "fact" that <text:span text:style-name="T131">Luke 16</text:span> describes "Paradise," <text:span text:style-name="T24">despite the word never appearing in that chapter</text:span>.</text:p>
                </text:list-item>
              </text:list>
            </text:list-item>
          </text:list>
        </text:list-item>
      </text:list>
      <text:p text:style-name="P41"/>
      <text:p text:style-name="P41"/>
      <text:p text:style-name="P42"><text:span text:style-name="T139">*</text:span> <text:span text:style-name="T140">The </text:span><text:span text:style-name="T141">Bible teaches us that after Jesus’ death, burial, and resurrection, that the “comfort side of hell” was emptied and that thereafter all </text:span><text:span text:style-name="T142">the saints </text:span><text:span text:style-name="T141">go directly to the presence of God without waiting in hell </text:span><text:span text:style-name="T143">(</text:span><text:span text:style-name="T144">Matt</text:span><text:span text:style-name="T145">hew</text:span><text:span text:style-name="T144"> 27:52,53</text:span><text:span text:style-name="T146">, </text:span><text:span text:style-name="T144">Eph</text:span><text:span text:style-name="T145">esians</text:span><text:span text:style-name="T144"> 4:8</text:span><text:span text:style-name="T146">, </text:span><text:span text:style-name="T147">Phil</text:span><text:span text:style-name="T145">ippians</text:span><text:span text:style-name="T147"> 1:23</text:span><text:span text:style-name="T143">, </text:span><text:span text:style-name="T147">2 Cor</text:span><text:span text:style-name="T145">inthians</text:span><text:span text:style-name="T147"> 5:8, </text:span><text:span text:style-name="T144">Rev</text:span><text:span text:style-name="T145">elation </text:span><text:span text:style-name="T144">1:18</text:span><text:span text:style-name="T143">).</text:span></text:p>
      <text:p text:style-name="P43"/>
      <text:p text:style-name="P43"><text:span text:style-name="T139">**</text:span> <text:span text:style-name="T148">This </text:span><text:span text:style-name="T149">assertion </text:span><text:span text:style-name="T148">can not be proven with the B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11:40:26.278355100</meta:creation-date>
    <dc:title>Where is paradise?</dc:title>
    <meta:editing-duration>PT2H2M18S</meta:editing-duration>
    <meta:editing-cycles>121</meta:editing-cycles>
    <meta:generator>LibreOffice/26.2.4.2$Linux_X86_64 LibreOffice_project/64a984c51f4702dbd3710b13428c673a2f1292e7</meta:generator>
    <dc:date>2026-07-11T12:30:16.884212270</dc:date>
    <meta:print-date>2026-04-08T13:42:06.839543700</meta:print-date>
    <meta:printed-by>PDF files</meta:printed-by>
    <meta:document-statistic meta:table-count="4" meta:image-count="0" meta:object-count="0" meta:page-count="3" meta:paragraph-count="56" meta:word-count="1763" meta:character-count="9707" meta:non-whitespace-character-count="8027"/>
    <meta:template xlink:type="simple" xlink:actuate="onRequest" xlink:title="default" xlink:href="../../../../AppData/Roaming/LibreOffice/4/user/template/default1.ott" meta:date="2026-04-08T11:40:26.133969500"/>
  </office:meta>
</office:document-meta>
</file>