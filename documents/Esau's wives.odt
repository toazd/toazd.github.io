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4" style:family="table">
      <style:table-properties style:width="7.8979in" table:align="left"/>
    </style:style>
    <style:style style:name="Table4.A" style:family="table-column">
      <style:table-column-properties style:column-width="0.9764in"/>
    </style:style>
    <style:style style:name="Table4.B" style:family="table-column">
      <style:table-column-properties style:column-width="3.1903in"/>
    </style:style>
    <style:style style:name="Table4.C" style:family="table-column">
      <style:table-column-properties style:column-width="3.7313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0382in" fo:border="0.5pt solid #000000"/>
    </style:style>
    <style:style style:name="Table4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Gabriela Nerd Font" fo:font-size="14pt" officeooo:rsid="002122cd" officeooo:paragraph-rsid="002122cd" style:font-size-asian="14pt" style:font-size-complex="14pt"/>
    </style:style>
    <style:style style:name="P2" style:family="paragraph" style:parent-style-name="Text_20_body">
      <style:text-properties officeooo:rsid="00213952" officeooo:paragraph-rsid="00213952"/>
    </style:style>
    <style:style style:name="P3" style:family="paragraph" style:parent-style-name="Text_20_body" style:list-style-name="L1">
      <style:text-properties officeooo:rsid="00314aef" officeooo:paragraph-rsid="00314aef"/>
    </style:style>
    <style:style style:name="P4" style:family="paragraph" style:parent-style-name="Text_20_body">
      <style:text-properties officeooo:paragraph-rsid="00213952"/>
    </style:style>
    <style:style style:name="P5" style:family="paragraph" style:parent-style-name="Table_20_Contents">
      <style:text-properties fo:color="#127622" loext:opacity="100%" officeooo:paragraph-rsid="00277a29"/>
    </style:style>
    <style:style style:name="P6" style:family="paragraph" style:parent-style-name="Table_20_Contents">
      <style:text-properties officeooo:paragraph-rsid="00277a29"/>
    </style:style>
    <style:style style:name="P7" style:family="paragraph" style:parent-style-name="Text_20_body" style:list-style-name="L2">
      <style:text-properties officeooo:rsid="00314aef" officeooo:paragraph-rsid="00314aef"/>
    </style:style>
    <style:style style:name="P8" style:family="paragraph" style:parent-style-name="Text_20_body">
      <style:text-properties officeooo:paragraph-rsid="00301d08"/>
    </style:style>
    <style:style style:name="P9" style:family="paragraph" style:parent-style-name="Text_20_body">
      <style:text-properties officeooo:paragraph-rsid="0031c05d"/>
    </style:style>
    <style:style style:name="P10" style:family="paragraph" style:parent-style-name="Table_20_Contents">
      <style:text-properties fo:color="#ff0000" loext:opacity="100%" fo:background-color="transparent"/>
    </style:style>
    <style:style style:name="P11" style:family="paragraph" style:parent-style-name="Text_20_body" style:list-style-name="L3">
      <style:text-properties officeooo:rsid="0038e1d3" officeooo:paragraph-rsid="0038e1d3"/>
    </style:style>
    <style:style style:name="P12" style:family="paragraph" style:parent-style-name="Text_20_body" style:list-style-name="L3">
      <style:text-properties officeooo:rsid="0039d21e" officeooo:paragraph-rsid="0039d21e"/>
    </style:style>
    <style:style style:name="P13" style:family="paragraph" style:parent-style-name="Table_20_Contents">
      <style:text-properties fo:color="#127622" loext:opacity="100%" style:font-name="Gabriela Nerd Font" fo:font-size="12pt" officeooo:rsid="00264dce" officeooo:paragraph-rsid="001ba4d6" style:font-size-asian="12pt" style:font-size-complex="12pt"/>
    </style:style>
    <style:style style:name="P14" style:family="paragraph" style:parent-style-name="Table_20_Contents" style:list-style-name="L4">
      <style:text-properties style:font-name="Liberation Sans" fo:font-size="12pt" officeooo:rsid="00264dce" officeooo:paragraph-rsid="001ba4d6" style:font-size-asian="12pt" style:font-size-complex="12pt"/>
    </style:style>
    <style:style style:name="P15" style:family="paragraph" style:parent-style-name="Table_20_Contents" style:list-style-name="L5">
      <style:text-properties officeooo:paragraph-rsid="001ba4d6"/>
    </style:style>
    <style:style style:name="P16" style:family="paragraph" style:parent-style-name="Table_20_Contents" style:list-style-name="L6">
      <style:text-properties style:font-name="Liberation Sans" fo:font-size="12pt" officeooo:rsid="0039dbdd" officeooo:paragraph-rsid="001ba4d6" style:font-size-asian="12pt" style:font-size-complex="12pt"/>
    </style:style>
    <style:style style:name="P17" style:family="paragraph" style:parent-style-name="Standard" style:list-style-name="L6">
      <style:text-properties officeooo:paragraph-rsid="001ba4d6"/>
    </style:style>
    <style:style style:name="P18" style:family="paragraph" style:parent-style-name="Table_20_Contents" style:list-style-name="L6">
      <style:text-properties style:font-name="Liberation Sans" fo:font-size="12pt" officeooo:rsid="0027f0c9" officeooo:paragraph-rsid="001ba4d6" style:font-size-asian="12pt" style:font-size-complex="12pt"/>
    </style:style>
    <style:style style:name="P19" style:family="paragraph" style:parent-style-name="Table_20_Contents" style:list-style-name="L6">
      <style:text-properties officeooo:paragraph-rsid="003eadf3"/>
    </style:style>
    <style:style style:name="P20" style:family="paragraph" style:parent-style-name="Table_20_Contents" style:list-style-name="L6">
      <style:text-properties style:font-name="Liberation Sans" fo:font-size="12pt" officeooo:rsid="002a2a5b" officeooo:paragraph-rsid="001ba4d6" style:font-size-asian="12pt" style:font-size-complex="12pt"/>
    </style:style>
    <style:style style:name="P21" style:family="paragraph" style:parent-style-name="Table_20_Contents" style:list-style-name="L6">
      <style:text-properties officeooo:paragraph-rsid="001ba4d6"/>
    </style:style>
    <style:style style:name="P22" style:family="paragraph" style:parent-style-name="Table_20_Contents" style:list-style-name="L6">
      <style:text-properties style:font-name="Liberation Sans" fo:font-size="12pt" officeooo:rsid="002c2ee9" officeooo:paragraph-rsid="001ba4d6" style:font-size-asian="12pt" style:font-size-complex="12pt"/>
    </style:style>
    <style:style style:name="P23" style:family="paragraph" style:parent-style-name="Standard">
      <style:text-properties officeooo:paragraph-rsid="001ba4d6"/>
    </style:style>
    <style:style style:name="P24" style:family="paragraph" style:parent-style-name="Standard">
      <style:text-properties officeooo:rsid="0043085d" officeooo:paragraph-rsid="0043085d"/>
    </style:style>
    <style:style style:name="P25" style:family="paragraph" style:parent-style-name="Standard">
      <style:text-properties officeooo:rsid="004615a6" officeooo:paragraph-rsid="0043085d"/>
    </style:style>
    <style:style style:name="P26" style:family="paragraph" style:parent-style-name="Standard" style:list-style-name="L7">
      <style:text-properties officeooo:rsid="004615a6" officeooo:paragraph-rsid="004615a6"/>
    </style:style>
    <style:style style:name="P27" style:family="paragraph" style:parent-style-name="Standard" style:list-style-name="L7">
      <style:text-properties officeooo:rsid="004468ec" officeooo:paragraph-rsid="004468ec"/>
    </style:style>
    <style:style style:name="P28" style:family="paragraph" style:parent-style-name="Standard" style:list-style-name="L7">
      <style:text-properties officeooo:rsid="004583b9" officeooo:paragraph-rsid="004583b9"/>
    </style:style>
    <style:style style:name="P29" style:family="paragraph" style:parent-style-name="Standard" style:list-style-name="L7">
      <style:text-properties officeooo:rsid="0046acce" officeooo:paragraph-rsid="0046acce"/>
    </style:style>
    <style:style style:name="P30" style:family="paragraph" style:parent-style-name="Standard" style:list-style-name="L7">
      <style:text-properties officeooo:rsid="0046d8db" officeooo:paragraph-rsid="0046d8db"/>
    </style:style>
    <style:style style:name="P31" style:family="paragraph" style:parent-style-name="Standard">
      <style:text-properties officeooo:rsid="0046d8db" officeooo:paragraph-rsid="0046d8db"/>
    </style:style>
    <style:style style:name="P32" style:family="paragraph" style:parent-style-name="Standard" style:list-style-name="L8">
      <style:text-properties officeooo:rsid="0047de3a" officeooo:paragraph-rsid="0047de3a"/>
    </style:style>
    <style:style style:name="P33" style:family="paragraph" style:parent-style-name="Standard">
      <style:text-properties officeooo:rsid="0047de3a" officeooo:paragraph-rsid="0047de3a"/>
    </style:style>
    <style:style style:name="P34" style:family="paragraph" style:parent-style-name="Standard">
      <style:text-properties officeooo:rsid="004bd89b" officeooo:paragraph-rsid="004bd89b"/>
    </style:style>
    <style:style style:name="P35" style:family="paragraph" style:parent-style-name="Table_20_Contents">
      <style:text-properties officeooo:paragraph-rsid="004bd89b"/>
    </style:style>
    <style:style style:name="P36" style:family="paragraph" style:parent-style-name="Standard">
      <style:text-properties officeooo:rsid="004dd8c6" officeooo:paragraph-rsid="004dd8c6"/>
    </style:style>
    <style:style style:name="T1" style:family="text">
      <style:text-properties fo:color="#127622" loext:opacity="100%"/>
    </style:style>
    <style:style style:name="T2" style:family="text">
      <style:text-properties officeooo:rsid="00241acd"/>
    </style:style>
    <style:style style:name="T3" style:family="text">
      <style:text-properties officeooo:rsid="00294b33"/>
    </style:style>
    <style:style style:name="T4" style:family="text">
      <style:text-properties style:text-position="super 58%"/>
    </style:style>
    <style:style style:name="T5" style:family="text">
      <style:text-properties fo:background-color="#fff5ce" loext:char-shading-value="0"/>
    </style:style>
    <style:style style:name="T6" style:family="text">
      <style:text-properties style:text-position="super 58%" officeooo:rsid="002e8b37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style:text-position="33% 80%"/>
    </style:style>
    <style:style style:name="T9" style:family="text">
      <style:text-properties style:text-position="super 58%" officeooo:rsid="002ee12a" fo:background-color="transparent" loext:char-shading-value="0"/>
    </style:style>
    <style:style style:name="T10" style:family="text">
      <style:text-properties officeooo:rsid="00301d08"/>
    </style:style>
    <style:style style:name="T11" style:family="text">
      <style:text-properties officeooo:rsid="0031c05d"/>
    </style:style>
    <style:style style:name="T12" style:family="text">
      <style:text-properties fo:color="#127622" loext:opacity="100%" officeooo:rsid="0031c05d"/>
    </style:style>
    <style:style style:name="T13" style:family="text">
      <style:text-properties officeooo:rsid="00332d1c"/>
    </style:style>
    <style:style style:name="T14" style:family="text">
      <style:text-properties fo:color="#ff0000" loext:opacity="100%" fo:background-color="transparent" loext:char-shading-value="0"/>
    </style:style>
    <style:style style:name="T15" style:family="text">
      <style:text-properties fo:color="#ff0000" loext:opacity="100%" fo:font-weight="bold" fo:background-color="transparent" loext:char-shading-value="0" style:font-weight-asian="bold" style:font-weight-complex="bold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3ad694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27f0c9"/>
    </style:style>
    <style:style style:name="T20" style:family="text">
      <style:text-properties style:font-name="Liberation Sans" fo:font-size="12pt" officeooo:rsid="002dc4ef" style:font-size-asian="12pt" style:font-size-complex="12pt"/>
    </style:style>
    <style:style style:name="T21" style:family="text">
      <style:text-properties style:font-name="Liberation Sans" fo:font-size="12pt" officeooo:rsid="00411f90" style:font-size-asian="12pt" style:font-size-complex="12pt"/>
    </style:style>
    <style:style style:name="T22" style:family="text">
      <style:text-properties style:font-name="Liberation Sans" fo:font-size="12pt" officeooo:rsid="0030888a" style:font-size-asian="12pt" style:font-size-complex="12pt"/>
    </style:style>
    <style:style style:name="T23" style:family="text">
      <style:text-properties fo:color="#127622" loext:opacity="100%" style:font-name="Gabriela Nerd Font" fo:font-size="12pt" officeooo:rsid="00264dce" style:font-size-asian="12pt" style:font-size-complex="12pt"/>
    </style:style>
    <style:style style:name="T24" style:family="text">
      <style:text-properties style:font-name="Liberation Sans" fo:font-size="12pt" officeooo:rsid="00319757" style:font-size-asian="12pt" style:font-size-complex="12pt"/>
    </style:style>
    <style:style style:name="T25" style:family="text">
      <style:text-properties fo:background-color="#b4c7dc" loext:char-shading-value="0"/>
    </style:style>
    <style:style style:name="T26" style:family="text">
      <style:text-properties style:text-position="super 58%" officeooo:rsid="004dd665" fo:background-color="transparent" loext:char-shading-value="0"/>
    </style:style>
    <style:style style:name="T27" style:family="text">
      <style:text-properties style:font-name="Liberation Sans" fo:font-size="12pt" officeooo:rsid="0042f0c0" style:font-size-asian="12pt" style:font-size-complex="12pt"/>
    </style:style>
    <style:style style:name="T28" style:family="text">
      <style:text-properties style:font-name="Liberation Sans" fo:font-size="12pt" officeooo:rsid="0048e4dc" style:font-size-asian="12pt" style:font-size-complex="12pt"/>
    </style:style>
    <style:style style:name="T29" style:family="text">
      <style:text-properties style:font-name="Liberation Sans" fo:font-size="12pt" officeooo:rsid="003f5df8" style:font-size-asian="12pt" style:font-size-complex="12pt"/>
    </style:style>
    <style:style style:name="T30" style:family="text">
      <style:text-properties style:font-name="Liberation Sans" fo:font-size="12pt" officeooo:rsid="004ada03" style:font-size-asian="12pt" style:font-size-complex="12pt"/>
    </style:style>
    <style:style style:name="T31" style:family="text">
      <style:text-properties fo:background-color="#ffd428" loext:char-shading-value="0"/>
    </style:style>
    <style:style style:name="T32" style:family="text">
      <style:text-properties style:text-position="0% 100%" officeooo:rsid="0029ce01"/>
    </style:style>
    <style:style style:name="T33" style:family="text">
      <style:text-properties officeooo:rsid="002dc4ef"/>
    </style:style>
    <style:style style:name="T34" style:family="text">
      <style:text-properties officeooo:rsid="00411f90"/>
    </style:style>
    <style:style style:name="T35" style:family="text">
      <style:text-properties style:text-position="0% 100%" officeooo:rsid="0029ce01" fo:background-color="#bbe33d" loext:char-shading-value="0"/>
    </style:style>
    <style:style style:name="T36" style:family="text">
      <style:text-properties style:text-position="0% 100%" fo:background-color="#bbe33d" loext:char-shading-value="0"/>
    </style:style>
    <style:style style:name="T37" style:family="text">
      <style:text-properties officeooo:rsid="00624314"/>
    </style:style>
    <style:style style:name="T38" style:family="text">
      <style:text-properties fo:color="#127622" loext:opacity="100%" style:font-name="Gabriela Nerd Font" fo:font-size="12pt" officeooo:rsid="004583b9" style:font-size-asian="12pt" style:font-size-complex="12pt"/>
    </style:style>
    <style:style style:name="T39" style:family="text">
      <style:text-properties fo:background-color="#afd095" loext:char-shading-value="0"/>
    </style:style>
    <style:style style:name="T40" style:family="text">
      <style:text-properties style:font-name="Liberation Sans" fo:font-size="12pt" officeooo:rsid="00570fdf" style:font-size-asian="12pt" style:font-size-complex="12pt"/>
    </style:style>
    <style:style style:name="T41" style:family="text">
      <style:text-properties style:font-name="Liberation Sans" fo:font-size="12pt" officeooo:rsid="002e1ed7" style:font-size-asian="12pt" style:font-size-complex="12pt"/>
    </style:style>
    <style:style style:name="T42" style:family="text">
      <style:text-properties style:font-name="Liberation Sans" fo:font-size="12pt" officeooo:rsid="002f18de" style:font-size-asian="12pt" style:font-size-complex="12pt"/>
    </style:style>
    <style:style style:name="T43" style:family="text">
      <style:text-properties officeooo:rsid="004ef47d"/>
    </style:style>
    <style:style style:name="T44" style:family="text">
      <style:text-properties officeooo:rsid="005092ed"/>
    </style:style>
    <style:style style:name="T45" style:family="text">
      <style:text-properties officeooo:rsid="0049c3dd"/>
    </style:style>
    <style:style style:name="T46" style:family="text">
      <style:text-properties officeooo:rsid="0051f87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au’s wives</text:p>
      <text:p text:style-name="Text_20_body"/>
      <text:p text:style-name="P2">Some Bible footnotes &amp; study material might assert that one of Esau’s wives (<text:span text:style-name="T1">Genesis 28:9</text:span>) named “Mahalath” is the same woman as <text:span text:style-name="T2">the</text:span> “Bashemath” in one or both of <text:span text:style-name="T1">Genesis 26:34</text:span> &amp; <text:span text:style-name="T1">Genesis 36:3</text:span>. <text:span text:style-name="T3">I</text:span>s there any Biblical evidence <text:span text:style-name="T3">to support that?</text:span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Genesis 28:8-9</text:span><text:line-break/><text:span text:style-name="T4">8</text:span> And Esau seeing that the daughters of Canaan pleased not Isaac his father; <text:line-break/><text:span text:style-name="T4">9</text:span> Then went Esau unto Ishmael, and took unto the wives which he had <text:span text:style-name="T5">Mahalath</text:span><text:span text:style-name="T6">H4258</text:span><text:span text:style-name="T7"> the daughter of Ishmael</text:span> Abraham's son, the sister of Nebajoth, to be his wife.</text:p>
          </table:table-cell>
        </table:table-row>
      </table:table>
      <text:list text:style-name="L1">
        <text:list-item>
          <text:p text:style-name="P3">Ishmael is a descendant of Shem the son of Noah.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Genesis 26:34</text:p>
            <text:p text:style-name="P6">And Esau was forty years old when he took to wife<text:span text:style-name="T7"> </text:span><text:span text:style-name="T5">Judith</text:span><text:span text:style-name="T6">H3067</text:span><text:span text:style-name="T7"> the daughter of Beeri the Hittite, a</text:span>nd <text:span text:style-name="T5">Bashemath</text:span><text:span text:style-name="T6">H1315</text:span><text:span text:style-name="T7"> the daughter of Elon the Hittite:</text:span></text:p>
          </table:table-cell>
        </table:table-row>
      </table:table>
      <text:list text:style-name="L2">
        <text:list-item>
          <text:p text:style-name="P7">Hittites (the sons of Heth) are descendants of Canaan son of Ham the son of Noah.</text:p>
        </text:list-item>
      </text:list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Genesis 36:2-3</text:span><text:line-break/><text:span text:style-name="T8">2</text:span> Esau took his wives of the daughters of Canaan; <text:span text:style-name="T5">Adah</text:span><text:span text:style-name="T9">H5711</text:span> the daughter of Elon the Hittite, and <text:span text:style-name="T5">Aholibamah</text:span><text:span text:style-name="T9">H173</text:span> the daughter of Anah the daughter of Zibeon the Hivite; <text:line-break/><text:span text:style-name="T8">3</text:span> And <text:span text:style-name="T5">Bashemath</text:span><text:span text:style-name="T9">H1315</text:span> Ishmael's daughter, sister of Nebajoth.</text:p>
          </table:table-cell>
        </table:table-row>
      </table:table>
      <text:p text:style-name="P4"/>
      <text:p text:style-name="P8"><text:span text:style-name="T10">H4258 &amp; H1314 are both entirely different, unrelated, Hebrew words so there’s no connection there. </text:span><text:span text:style-name="T11">Relying on </text:span><text:span text:style-name="T12">Genesis 28:9</text:span>’s<text:span text:style-name="T12"> </text:span><text:span text:style-name="T11">use of the definite article “the” before “sister of Nebajoth” </text:span><text:span text:style-name="T13">is simply not rightly dividing the word of truth:</text:span></text:p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Mark 12:35</text:span><text:line-break/>And Jesus answered and said, while he taught in the temple, <text:span text:style-name="T14">How say the scribes that Christ is </text:span><text:span text:style-name="T15">the</text:span><text:span text:style-name="T14"> Son of David?</text:span></text:p>
            <text:p text:style-name="P10"/>
            <text:p text:style-name="P10"><text:span text:style-name="T1">Revelation 22:16</text:span><text:line-break/>I Jesus have sent mine angel to testify unto you these things in the churches. I am <text:span text:style-name="T16">the</text:span> <text:span text:style-name="T5">root</text:span> and <text:span text:style-name="T16">the</text:span> <text:span text:style-name="T5">offspring</text:span> of David, and the bright and morning star.</text:p>
            <text:p text:style-name="P10"/>
            <text:p text:style-name="Table_20_Contents"><text:span text:style-name="T1">1 Chronicles 3:1-9</text:span><text:line-break/>1 Now these were <text:span text:style-name="T16">the</text:span> <text:span text:style-name="T5">sons</text:span> of David, which were born unto him in Hebron; <text:span text:style-name="T16">the</text:span> firstborn <text:span text:style-name="T5">Amnon</text:span>, of Ahinoam the Jezreelitess; the second <text:span text:style-name="T5">Daniel</text:span>, of Abigail the Carmelitess: 2 The third, <text:span text:style-name="T5">Absalom</text:span> the son of Maachah the daughter of Talmai king of Geshur: the fourth, <text:span text:style-name="T5">Adonijah</text:span> the son of Haggith: 3 The fifth, <text:span text:style-name="T5">Shephatiah</text:span> of Abital: the sixth, <text:span text:style-name="T5">Ithream</text:span> by Eglah his wife. 4 These six were born unto him in Hebron; and there he reigned seven years and six months: and in Jerusalem he reigned thirty and three years. 5 And these were born unto him in Jerusalem; <text:span text:style-name="T5">Shimea</text:span>, and <text:span text:style-name="T5">Shobab</text:span>, and <text:span text:style-name="T5">Nathan</text:span>, and <text:span text:style-name="T5">Solomon</text:span>, four, of Bathshua the daughter of Ammiel: 6 <text:span text:style-name="T5">Ibhar</text:span> also, and <text:span text:style-name="T5">Elishama</text:span>, and <text:span text:style-name="T5">Eliphelet</text:span>, 7 And <text:span text:style-name="T5">Nogah</text:span>, and <text:span text:style-name="T5">Nepheg</text:span>, and <text:span text:style-name="T5">Japhia</text:span>, 8 And <text:span text:style-name="T5">Elishama</text:span>, and <text:span text:style-name="T5">Eliada</text:span>, and <text:span text:style-name="T5">Eliphelet</text:span>, nine. 9 These were all <text:span text:style-name="T16">the</text:span> <text:span text:style-name="T5">sons</text:span> of David, beside the sons of the concubines, and Tamar their sister.</text:p>
          </table:table-cell>
        </table:table-row>
      </table:table>
      <text:list text:style-name="L3">
        <text:list-item>
          <text:p text:style-name="P11">There are many such examples as these all throughout Scripture that tell us undoubtedly that when the definite article “the” is used to denote a child God does not necessarily mean it was the only child.</text:p>
        </text:list-item>
        <text:list-item>
          <text:p text:style-name="P12">God is not the author of confusion so he didn’t leave us to guess what He means: He is explicit when it is necessary and we should be rightly cautious to jump to conclusions without evidence (<text:span text:style-name="T1">1Thess. 5:21</text:span>). <text:span text:style-name="T17">The workers of iniquity have no such qualms about perverting the truth.</text:span></text:p>
        </text:list-item>
      </text:list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table:number-rows-spanned="2" office:value-type="string">
            <text:p text:style-name="P13">Gen 26:34</text:p>
          </table:table-cell>
          <table:table-cell table:style-name="Table4.A1" office:value-type="string">
            <text:list xml:id="list752657537" text:style-name="L4">
              <text:list-item>
                <text:p text:style-name="P14"><text:span text:style-name="T16">Judith</text:span><text:span text:style-name="T4">H3067</text:span><text:span text:style-name="T18"> </text:span><text:span text:style-name="T19">(daughter of Beeri the Hittite)</text:span></text:p>
              </text:list-item>
            </text:list>
          </table:table-cell>
          <table:table-cell table:style-name="Table4.C1" table:number-rows-spanned="2" office:value-type="string">
            <text:list xml:id="list3109308248" text:style-name="L5">
              <text:list-item>
                <text:p text:style-name="P15"><text:span text:style-name="T20">Noah→Ham→</text:span><text:span text:style-name="T21">Canaan→Heth→(Hittites)</text:span><text:span text:style-name="T20"> </text:span><text:span text:style-name="T22">(</text:span><text:span text:style-name="T23">Genesis 10:6-15, 23:10, 49:32</text:span><text:span text:style-name="T24">)</text:span></text:p>
              </text:list-item>
            </text:list>
          </table:table-cell>
        </table:table-row>
        <table:table-row>
          <table:covered-table-cell table:style-name="Table4.A1"/>
          <table:table-cell table:style-name="Table4.B2" office:value-type="string">
            <text:list text:continue-list="list752657537" text:style-name="L4">
              <text:list-item>
                <text:p text:style-name="P14"><text:span text:style-name="T5">Bashemath</text:span><text:span text:style-name="T4">H1315</text:span><text:span text:style-name="T18"> </text:span><text:span text:style-name="T19">(daughter of Elon the Hittite)</text:span></text:p>
              </text:list-item>
            </text:list>
          </table:table-cell>
          <table:covered-table-cell table:style-name="Table4.C1"/>
        </table:table-row>
        <table:table-row>
          <table:table-cell table:style-name="Table4.B2" office:value-type="string">
            <text:p text:style-name="P13">Gen 28:8,9</text:p>
          </table:table-cell>
          <table:table-cell table:style-name="Table4.B2" office:value-type="string">
            <text:list text:style-name="L6">
              <text:list-item>
                <text:p text:style-name="P16"><text:span text:style-name="T25">Mahalath</text:span><text:span text:style-name="T26">H4258</text:span> (daughter of Ishmael, sister of Nebajoth)</text:p>
              </text:list-item>
            </text:list>
          </table:table-cell>
          <table:table-cell table:style-name="Table4.C3" office:value-type="string">
            <text:list text:continue-numbering="true" text:style-name="L6">
              <text:list-item>
                <text:p text:style-name="P17"><text:span text:style-name="T27">Noah → Shem → </text:span><text:span text:style-name="T28">Abraham </text:span><text:span text:style-name="T29">&amp; </text:span><text:span text:style-name="T28">Hagar → Ishmael → Nebajoth/Nebaioth </text:span><text:span text:style-name="T30">(</text:span><text:span text:style-name="T23">Genesis 25:12,13</text:span><text:span text:style-name="T30">)</text:span></text:p>
              </text:list-item>
            </text:list>
          </table:table-cell>
        </table:table-row>
        <table:table-row>
          <table:table-cell table:style-name="Table4.B2" table:number-rows-spanned="3" office:value-type="string">
            <text:p text:style-name="P13">Gen 36:2-4</text:p>
          </table:table-cell>
          <table:table-cell table:style-name="Table4.B2" office:value-type="string">
            <text:list text:continue-numbering="true" text:style-name="L6">
              <text:list-item>
                <text:p text:style-name="P18"><text:span text:style-name="T31">Adah</text:span><text:span text:style-name="T4">H5711</text:span><text:span text:style-name="T18"> </text:span><text:span text:style-name="T32">(daughter of Elon the Hittite)</text:span></text:p>
              </text:list-item>
            </text:list>
          </table:table-cell>
          <table:table-cell table:style-name="Table4.C3" office:value-type="string">
            <text:list text:continue-numbering="true" text:style-name="L6">
              <text:list-item>
                <text:p text:style-name="P19"><text:span text:style-name="T33">Noah→Ham→</text:span><text:span text:style-name="T34">Canaan→Heth→(Hittites)</text:span></text:p>
              </text:list-item>
            </text:list>
          </table:table-cell>
        </table:table-row>
        <table:table-row>
          <table:covered-table-cell table:style-name="Table4.B2"/>
          <table:table-cell table:style-name="Table4.B2" office:value-type="string">
            <text:list text:continue-numbering="true" text:style-name="L6">
              <text:list-item>
                <text:p text:style-name="P20"><text:span text:style-name="T35">A</text:span><text:span text:style-name="T36">holibamah</text:span><text:span text:style-name="T4">H173</text:span><text:span text:style-name="T18"> (daughter of Anah</text:span><text:span text:style-name="T4">H6034</text:span><text:span text:style-name="T18"> the daughter of Zibeon</text:span><text:span text:style-name="T4">H6649</text:span><text:span text:style-name="T18"> the Hivite)</text:span></text:p>
              </text:list-item>
            </text:list>
          </table:table-cell>
          <table:table-cell table:style-name="Table4.C3" office:value-type="string">
            <text:list text:continue-numbering="true" text:style-name="L6">
              <text:list-item>
                <text:p text:style-name="P21">Noah→Ham→Canaan→Hivite <text:span text:style-name="T37">(</text:span><text:span text:style-name="T23">Genesis 10:15-17, </text:span><text:span text:style-name="T38">1Ch 1:15</text:span>)</text:p>
              </text:list-item>
            </text:list>
          </table:table-cell>
        </table:table-row>
        <table:table-row>
          <table:covered-table-cell table:style-name="Table4.B2"/>
          <table:table-cell table:style-name="Table4.B2" office:value-type="string">
            <text:list text:continue-numbering="true" text:style-name="L6">
              <text:list-item>
                <text:p text:style-name="P22"><text:span text:style-name="T39">Bashemath</text:span><text:span text:style-name="T4">H1315</text:span><text:span text:style-name="T18"> (daughter of Ishmael, sister of Nebajoth)</text:span></text:p>
              </text:list-item>
            </text:list>
          </table:table-cell>
          <table:table-cell table:style-name="Table4.C3" office:value-type="string">
            <text:list text:continue-list="list3109308248" text:style-name="L5">
              <text:list-item>
                <text:p text:style-name="P15"><text:span text:style-name="T40">Noah→Shem→</text:span><text:span text:style-name="T41">Abraham→Ishmael </text:span><text:span text:style-name="T42">(</text:span><text:span text:style-name="T23">Genesis 10:1, 11:10-26, 25:12,13</text:span>)</text:p>
              </text:list-item>
            </text:list>
          </table:table-cell>
        </table:table-row>
      </table:table>
      <text:p text:style-name="P23"/>
      <text:p text:style-name="P23"/>
      <text:p text:style-name="P24">And so just looking at Scripture <text:span text:style-name="T43">the list of Esau’s wives is very simply laid out for us</text:span>:</text:p>
      <text:p text:style-name="P25"/>
      <text:list text:style-name="L7">
        <text:list-item>
          <text:p text:style-name="P26">Noah → Ham → Canaan</text:p>
          <text:list>
            <text:list-item>
              <text:p text:style-name="P27">Judith daughter of Beeri (Hittite)</text:p>
            </text:list-item>
            <text:list-item>
              <text:p text:style-name="P27">Bashemath daughter of Elon (Hittite)</text:p>
            </text:list-item>
            <text:list-item>
              <text:p text:style-name="P28">Adah daughter of Elon (Hittite)</text:p>
            </text:list-item>
            <text:list-item>
              <text:p text:style-name="P29">Aholibamah daughter of Zibeon (Hivite)</text:p>
            </text:list-item>
          </text:list>
        </text:list-item>
        <text:list-item>
          <text:p text:style-name="P29">Noah → Shem → Abraham → Ishmael</text:p>
          <text:list>
            <text:list-item>
              <text:p text:style-name="P30">Mahalath daughter of Ishma<text:span text:style-name="T44">el</text:span> (Ishmaelite)</text:p>
            </text:list-item>
            <text:list-item>
              <text:p text:style-name="P30">Bashemath daughter of Ishmael (Ishmaelite)</text:p>
            </text:list-item>
          </text:list>
        </text:list-item>
      </text:list>
      <text:p text:style-name="P31"/>
      <text:p text:style-name="P31"/>
      <text:p text:style-name="P31">Which lines up perfectly with what we read elsewhere in Scripture:</text:p>
      <text:p text:style-name="P31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1">Genesis 27:46</text:span><text:line-break/>And Rebekah said to Isaac, <text:span text:style-name="T5">I am weary of my life because of the daughters of Heth</text:span>: if Jacob take a wife of the daughters of Heth, such as these which are of the daughters of the land, what good shall my life do me?</text:p>
          </table:table-cell>
        </table:table-row>
      </table:table>
      <text:list text:style-name="L8">
        <text:list-item>
          <text:p text:style-name="P32">Esau had three of those <text:span text:style-name="T45">ungodly </text:span>woman to wife and that’s exactly what Rebekah was talking about.</text:p>
        </text:list-item>
      </text:list>
      <text:p text:style-name="P33"/>
      <text:p text:style-name="P33"/>
      <text:p text:style-name="P34">Why did Esau decide to <text:span text:style-name="T46">later </text:span>marry some of the daughters of Ishmael?</text:p>
      <text:p text:style-name="P34"/>
      <table:table table:name="Table7" table:style-name="Table7">
        <table:table-column table:style-name="Table7.A"/>
        <table:table-row>
          <table:table-cell table:style-name="Table7.A1" office:value-type="string">
            <text:p text:style-name="P35"><text:span text:style-name="T1">Genesis 28:6-9</text:span><text:line-break/><text:span text:style-name="T8">6</text:span> When Esau saw that Isaac had blessed Jacob, and sent him away to Padanaram, to take him a wife from thence; and that as he blessed him he gave him a charge, saying, Thou shalt not take a wife of the daughters of Canaan;</text:p>
            <text:p text:style-name="P35"><text:span text:style-name="T8">7</text:span> And that Jacob obeyed his father and his mother, and was gone to Padanaram;</text:p>
            <text:p text:style-name="P35"><text:span text:style-name="T8">8</text:span> And <text:span text:style-name="T5">Esau seeing that the daughters of Canaan pleased not Isaac his father</text:span>;</text:p>
            <text:p text:style-name="P35"><text:span text:style-name="T8">9</text:span> Then went Esau unto Ishmael, and took unto the wives which he had Mahalath the daughter of Ishmael Abraham's son, the sister of Nebajoth, to be his wife.</text:p>
          </table:table-cell>
        </table:table-row>
      </table:table>
      <text:p text:style-name="P34"/>
      <text:p text:style-name="P36">And later on in <text:span text:style-name="T1">Genesis 36</text:span> we learn that he also took another wife from the daughters of Ishmae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3T18:23:31.085829900</meta:creation-date>
    <meta:editing-duration>PT1H36M22S</meta:editing-duration>
    <meta:editing-cycles>60</meta:editing-cycles>
    <meta:generator>LibreOffice/26.2.4.2$Linux_X86_64 LibreOffice_project/64a984c51f4702dbd3710b13428c673a2f1292e7</meta:generator>
    <dc:title>Esau's wives</dc:title>
    <dc:date>2026-07-11T12:30:21.368913766</dc:date>
    <meta:print-date>2025-10-10T10:45:16.296866100</meta:print-date>
    <meta:printed-by>PDF files: William K. McDannell Jr.</meta:printed-by>
    <meta:document-statistic meta:table-count="7" meta:image-count="0" meta:object-count="0" meta:page-count="2" meta:paragraph-count="46" meta:word-count="892" meta:character-count="5042" meta:non-whitespace-character-count="4218"/>
    <meta:template xlink:type="simple" xlink:actuate="onRequest" xlink:title="BibleStudyTemplate" xlink:href="../../../../AppData/Roaming/LibreOffice/4/user/template/BibleStudyTemplate.ott" meta:date="2025-06-13T18:23:30.717854900"/>
  </office:meta>
</office:document-meta>
</file>