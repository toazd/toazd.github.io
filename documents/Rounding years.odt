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9in" table:align="center"/>
    </style:style>
    <style:style style:name="Table1.A" style:family="table-column">
      <style:table-column-properties style:column-width="7.9in"/>
    </style:style>
    <style:style style:name="Table1.A1" style:family="table-cell">
      <style:table-cell-properties fo:padding="0.0382in" fo:border="0.75pt solid #000000"/>
    </style:style>
    <style:style style:name="Table1.A2" style:family="table-cell">
      <style:table-cell-properties fo:padding="0.0382in" fo:border-left="0.75pt solid #000000" fo:border-right="0.75pt solid #000000" fo:border-top="none" fo:border-bottom="0.75pt solid #000000"/>
    </style:style>
    <style:style style:name="Table2" style:family="table">
      <style:table-properties style:width="7.9in" table:align="margins"/>
    </style:style>
    <style:style style:name="Table2.A" style:family="table-column">
      <style:table-column-properties style:column-width="7.9in" style:rel-column-width="65535*"/>
    </style:style>
    <style:style style:name="Table2.A1" style:family="table-cell">
      <style:table-cell-properties fo:padding="0.0382in" fo:border="0.5pt solid #000000"/>
    </style:style>
    <style:style style:name="P1" style:family="paragraph" style:parent-style-name="Table_20_Contents">
      <style:text-properties fo:color="#127622" loext:opacity="100%" officeooo:paragraph-rsid="0007ca6c"/>
    </style:style>
    <style:style style:name="P2" style:family="paragraph" style:parent-style-name="Table_20_Contents">
      <style:text-properties officeooo:paragraph-rsid="0007ca6c"/>
    </style:style>
    <style:style style:name="P3" style:family="paragraph" style:parent-style-name="Table_20_Contents">
      <style:text-properties fo:color="#127622" loext:opacity="100%" officeooo:paragraph-rsid="000367cf"/>
    </style:style>
    <style:style style:name="P4" style:family="paragraph" style:parent-style-name="Table_20_Contents">
      <style:text-properties officeooo:paragraph-rsid="000367cf"/>
    </style:style>
    <style:style style:name="P5" style:family="paragraph" style:parent-style-name="Table_20_Contents">
      <style:text-properties fo:color="#127622" loext:opacity="100%" officeooo:paragraph-rsid="0008961c"/>
    </style:style>
    <style:style style:name="P6" style:family="paragraph" style:parent-style-name="Table_20_Contents">
      <style:text-properties officeooo:paragraph-rsid="0008961c"/>
    </style:style>
    <style:style style:name="P7" style:family="paragraph" style:parent-style-name="Table_20_Contents">
      <style:text-properties fo:color="#127622" loext:opacity="100%" officeooo:paragraph-rsid="0008dcc6"/>
    </style:style>
    <style:style style:name="P8" style:family="paragraph" style:parent-style-name="Table_20_Contents">
      <style:text-properties officeooo:paragraph-rsid="0008dcc6"/>
    </style:style>
    <style:style style:name="P9" style:family="paragraph" style:parent-style-name="Standard" style:list-style-name="L1">
      <style:text-properties officeooo:rsid="00053f9e" officeooo:paragraph-rsid="00053f9e"/>
    </style:style>
    <style:style style:name="P10" style:family="paragraph" style:parent-style-name="Standard" style:list-style-name="L1">
      <style:text-properties officeooo:rsid="000645e9" officeooo:paragraph-rsid="000645e9"/>
    </style:style>
    <style:style style:name="P11" style:family="paragraph" style:parent-style-name="Standard">
      <style:text-properties officeooo:paragraph-rsid="0000d2ec"/>
    </style:style>
    <style:style style:name="P12" style:family="paragraph" style:parent-style-name="Table_20_Contents">
      <style:text-properties fo:color="#127622" loext:opacity="100%" officeooo:paragraph-rsid="0000d2ec"/>
    </style:style>
    <style:style style:name="P13" style:family="paragraph" style:parent-style-name="Table_20_Contents">
      <style:text-properties officeooo:paragraph-rsid="0000d2ec"/>
    </style:style>
    <style:style style:name="P14" style:family="paragraph" style:parent-style-name="Table_20_Contents">
      <style:text-properties officeooo:paragraph-rsid="0000d2ec" fo:background-color="transparent"/>
    </style:style>
    <style:style style:name="P15" style:family="paragraph" style:parent-style-name="Standard" style:list-style-name="L2">
      <style:text-properties officeooo:rsid="0002fd04" officeooo:paragraph-rsid="0002fd04"/>
    </style:style>
    <style:style style:name="P16" style:family="paragraph" style:parent-style-name="Standard" style:list-style-name="L2">
      <style:text-properties officeooo:rsid="0010968b" officeooo:paragraph-rsid="0010968b"/>
    </style:style>
    <style:style style:name="T1" style:family="text">
      <style:text-properties fo:background-color="#fff5ce" loext:char-shading-value="0"/>
    </style:style>
    <style:style style:name="T2" style:family="text">
      <style:text-properties style:text-position="super 58%"/>
    </style:style>
    <style:style style:name="T3" style:family="text">
      <style:text-properties officeooo:rsid="000e325a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6b3d9" style:font-style-asian="normal" style:font-style-complex="normal"/>
    </style:style>
    <style:style style:name="T7" style:family="text">
      <style:text-properties fo:background-color="transparent" loext:char-shading-value="0"/>
    </style:style>
    <style:style style:name="T8" style:family="text">
      <style:text-properties style:text-position="super 58%" fo:background-color="transparent" loext:char-shading-value="0"/>
    </style:style>
    <style:style style:name="T9" style:family="text">
      <style:text-properties officeooo:rsid="0013a2d7"/>
    </style:style>
    <style:style style:name="T10" style:family="text">
      <style:text-properties style:text-position="super 58%" officeooo:rsid="0013a2d7"/>
    </style:style>
    <style:style style:name="T11" style:family="text">
      <style:text-properties officeooo:rsid="0014bfc8"/>
    </style:style>
    <style:style style:name="T12" style:family="text">
      <style:text-properties fo:font-style="normal" officeooo:rsid="000c9401" style:font-style-asian="normal" style:font-style-complex="normal"/>
    </style:style>
    <style:style style:name="T13" style:family="text">
      <style:text-properties fo:font-style="normal" officeooo:rsid="001243d6" style:font-style-asian="normal" style:font-style-complex="normal"/>
    </style:style>
    <style:style style:name="T14" style:family="text">
      <style:text-properties style:text-position="super 58%" fo:font-style="normal" officeooo:rsid="001243d6" style:font-style-asian="normal" style:font-style-complex="normal"/>
    </style:style>
    <style:style style:name="T15" style:family="text">
      <style:text-properties fo:font-style="normal" officeooo:rsid="0013a5f8" style:font-style-asian="normal" style:font-style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">2 Samuel 2:11</text:p>
            <text:p text:style-name="P2">And the time that David was king in Hebron over the house of Judah was <text:span text:style-name="T1">seven years and six months</text:span>.</text:p>
          </table:table-cell>
        </table:table-row>
        <table:table-row>
          <table:table-cell table:style-name="Table1.A2" office:value-type="string">
            <text:p text:style-name="P3">2 Samuel 5:4-5</text:p>
            <text:p text:style-name="P4"><text:span text:style-name="T2">4</text:span> David was thirty years old when he began to reign, and <text:span text:style-name="T1">he reigned forty years</text:span>.</text:p>
            <text:p text:style-name="P4"><text:span text:style-name="T2">5</text:span> In Hebron he reigned over Judah <text:span text:style-name="T1">seven years and six months</text:span>: and in Jerusalem he reigned <text:span text:style-name="T1">thirty and three years</text:span> over all Israel and Judah.</text:p>
          </table:table-cell>
        </table:table-row>
        <table:table-row>
          <table:table-cell table:style-name="Table1.A2" office:value-type="string">
            <text:p text:style-name="P5">1 Kings 2:11</text:p>
            <text:p text:style-name="P6">And the days that David reigned over Israel were <text:span text:style-name="T1">forty years</text:span>: <text:span text:style-name="T1">seven years</text:span> reigned he in Hebron, and <text:span text:style-name="T1">thirty and three years</text:span> reigned he in Jerusalem.</text:p>
          </table:table-cell>
        </table:table-row>
        <table:table-row>
          <table:table-cell table:style-name="Table1.A2" office:value-type="string">
            <text:p text:style-name="P7">1 Chronicles 3:4</text:p>
            <text:p text:style-name="P8">These six were born unto him in Hebron; and there he reigned <text:span text:style-name="T1">seven years and six months</text:span>: and in Jerusalem he reigned <text:span text:style-name="T1">thirty and three years</text:span>.</text:p>
          </table:table-cell>
        </table:table-row>
      </table:table>
      <text:list text:style-name="L1">
        <text:list-item>
          <text:p text:style-name="P9">7.5 + 33 = 40.5 years</text:p>
        </text:list-item>
        <text:list-item>
          <text:p text:style-name="P10"><text:span text:style-name="T3">So</text:span> here <text:span text:style-name="T3">we see years </text:span>reckoned by <text:span text:style-name="T4">whole</text:span><text:span text:style-name="T5"> years </text:span><text:span text:style-name="T6">rounded down.</text:span></text:p>
        </text:list-item>
      </text:list>
      <text:p text:style-name="P11"/>
      <table:table table:name="Table2" table:style-name="Table2">
        <table:table-column table:style-name="Table2.A"/>
        <table:table-row>
          <table:table-cell table:style-name="Table2.A1" office:value-type="string">
            <text:p text:style-name="P12">1 Kings 15:25-28</text:p>
            <text:p text:style-name="P13"><text:span text:style-name="T2">25</text:span> And <text:span text:style-name="T1">Nadab</text:span> the son of Jeroboam began to reign over Israel <text:span text:style-name="T1">in the second year of Asa king of Judah, and reigned over Israel two years</text:span>.</text:p>
            <text:p text:style-name="P13"><text:span text:style-name="T2">26</text:span> A<text:span text:style-name="T7">nd he did evil in the sight of the LORD, and walked in the way of his father, and in his sin wherewith he made Israel to sin.</text:span></text:p>
            <text:p text:style-name="P14"><text:span text:style-name="T2">27</text:span> And Baasha the son of Ahijah, of the house of Issachar, conspired against him; and Baasha smote him at Gibbethon, which belonged to the Philistines; for Nadab and all Israel laid siege to Gibbethon.</text:p>
            <text:p text:style-name="P13"><text:span text:style-name="T8">28</text:span><text:span text:style-name="T7"> Even </text:span><text:span text:style-name="T1">in the third year of Asa king of Judah did Baasha slay him</text:span><text:span text:style-name="T7">, a</text:span>nd reigned in his stead.</text:p>
          </table:table-cell>
        </table:table-row>
      </table:table>
      <text:list text:style-name="L2">
        <text:list-item>
          <text:p text:style-name="P15">Nadab reigning two years <text:span text:style-name="T9">beginning in the 2</text:span><text:span text:style-name="T10">nd</text:span><text:span text:style-name="T9"> year of Asa </text:span>means <text:span text:style-name="T9">that Nadab</text:span> reigned until the 4<text:span text:style-name="T2">th</text:span> year of <text:span text:style-name="T9">Asa’s reign</text:span>.</text:p>
        </text:list-item>
        <text:list-item>
          <text:p text:style-name="P15">But, Nadab was <text:span text:style-name="T11">also </text:span>slain in the 3<text:span text:style-name="T2">rd</text:span> year of Asa’s reign.</text:p>
        </text:list-item>
        <text:list-item>
          <text:p text:style-name="P16"><text:span text:style-name="T12">T</text:span><text:span text:style-name="T5">he only way to get 2 years out of </text:span><text:span text:style-name="T13">Asa’s 3</text:span><text:span text:style-name="T14">rd</text:span><text:span text:style-name="T13"> to 4</text:span><text:span text:style-name="T14">th</text:span><text:span text:style-name="T13"> year is to round up</text:span><text:span text:style-name="T15">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/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18T20:03:04.986072743</meta:creation-date>
    <dc:title>default</dc:title>
    <meta:editing-duration>PT1H9M3S</meta:editing-duration>
    <meta:editing-cycles>21</meta:editing-cycles>
    <meta:generator>LibreOffice/26.2.4.2$Linux_X86_64 LibreOffice_project/64a984c51f4702dbd3710b13428c673a2f1292e7</meta:generator>
    <dc:date>2026-07-11T12:19:49.828658563</dc:date>
    <meta:document-statistic meta:table-count="2" meta:image-count="0" meta:object-count="0" meta:page-count="1" meta:paragraph-count="19" meta:word-count="314" meta:character-count="1563" meta:non-whitespace-character-count="1273"/>
    <meta:template xlink:type="simple" xlink:actuate="onRequest" xlink:title="default" xlink:href="../Rounding%20years.ott" meta:date="2025-07-18T20:03:04.744466154"/>
  </office:meta>
</office:document-meta>
</file>