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B00000273A320040A.png" manifest:media-type="image/png"/>
  <manifest:file-entry manifest:full-path="Pictures/10000000000002E1000001AB3DC12E9C.png" manifest:media-type="image/png"/>
  <manifest:file-entry manifest:full-path="Pictures/100000010000044C0000030301807A32.png" manifest:media-type="image/png"/>
  <manifest:file-entry manifest:full-path="Pictures/10000000000002E1000001AB72A179ED.png" manifest:media-type="image/png"/>
  <manifest:file-entry manifest:full-path="Pictures/1000000000000320000002062ABC1915.jpg" manifest:media-type="image/jpeg"/>
  <manifest:file-entry manifest:full-path="Pictures/100000010000014300000115175A75D3.png" manifest:media-type="image/png"/>
  <manifest:file-entry manifest:full-path="Pictures/100000000000032000000258B3214CAB.jpg" manifest:media-type="image/jpeg"/>
  <manifest:file-entry manifest:full-path="Pictures/10000001000003D3000003BB9B4EBCCF.png" manifest:media-type="image/png"/>
  <manifest:file-entry manifest:full-path="Pictures/10000000000002E1000003A2B0E4E9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" svg:font-family="Gabriela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in" table:align="margins"/>
    </style:style>
    <style:style style:name="Table5.A" style:family="table-column">
      <style:table-column-properties style:column-width="2in" style:rel-column-width="16383*"/>
    </style:style>
    <style:style style:name="Table5.D" style:family="table-column">
      <style:table-column-properties style:column-width="2in" style:rel-column-width="1638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6" style:family="table">
      <style:table-properties style:width="8in" table:align="margins"/>
    </style:style>
    <style:style style:name="Table6.A" style:family="table-column">
      <style:table-column-properties style:column-width="4in" style:rel-column-width="32767*"/>
    </style:style>
    <style:style style:name="Table6.B" style:family="table-column">
      <style:table-column-properties style:column-width="4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.5" style:family="table-row">
      <style:table-row-properties style:min-row-height="0.6833in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8in" style:rel-column-width="65535*"/>
    </style:style>
    <style:style style:name="Table3.A1" style:family="table-cell">
      <style:table-cell-properties fo:padding="0.0382in" fo:border="0.5pt solid #000000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8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in" table:align="margins"/>
    </style:style>
    <style:style style:name="Table2.A" style:family="table-column">
      <style:table-column-properties style:column-width="2.0979in" style:rel-column-width="17185*"/>
    </style:style>
    <style:style style:name="Table2.B" style:family="table-column">
      <style:table-column-properties style:column-width="5.9021in" style:rel-column-width="48350*"/>
    </style:style>
    <style:style style:name="Table2.1" style:family="table-row">
      <style:table-row-properties style:min-row-height="0.980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4" style:family="table">
      <style:table-properties style:width="8in" table:align="margins"/>
    </style:style>
    <style:style style:name="Table4.A" style:family="table-column">
      <style:table-column-properties style:column-width="2.3667in" style:rel-column-width="19387*"/>
    </style:style>
    <style:style style:name="Table4.B" style:family="table-column">
      <style:table-column-properties style:column-width="3.6458in" style:rel-column-width="29866*"/>
    </style:style>
    <style:style style:name="Table4.C" style:family="table-column">
      <style:table-column-properties style:column-width="1.9875in" style:rel-column-width="1628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7" style:family="table">
      <style:table-properties style:width="8in" table:align="margins"/>
    </style:style>
    <style:style style:name="Table7.A" style:family="table-column">
      <style:table-column-properties style:column-width="2.6646in" style:rel-column-width="21827*"/>
    </style:style>
    <style:style style:name="Table7.B" style:family="table-column">
      <style:table-column-properties style:column-width="2.3083in" style:rel-column-width="18907*"/>
    </style:style>
    <style:style style:name="Table7.C" style:family="table-column">
      <style:table-column-properties style:column-width="3.0278in" style:rel-column-width="24801*"/>
    </style:style>
    <style:style style:name="Table7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style:vertical-align="middle" fo:padding="0.0382in" fo:border="0.5pt solid #000000"/>
    </style:style>
    <style:style style:name="Table7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8in" table:align="margins"/>
    </style:style>
    <style:style style:name="Table8.A" style:family="table-column">
      <style:table-column-properties style:column-width="1.6667in" style:rel-column-width="13653*"/>
    </style:style>
    <style:style style:name="Table8.B" style:family="table-column">
      <style:table-column-properties style:column-width="2.8083in" style:rel-column-width="23005*"/>
    </style:style>
    <style:style style:name="Table8.C" style:family="table-column">
      <style:table-column-properties style:column-width="3.525in" style:rel-column-width="28877*"/>
    </style:style>
    <style:style style:name="Table8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style:vertical-align="middle" fo:padding="0.0382in" fo:border="0.5pt solid #000000"/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24a4a7" officeooo:paragraph-rsid="0024a4a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0pt" officeooo:rsid="028cc68b" officeooo:paragraph-rsid="02957289" style:font-size-asian="10pt" style:font-size-complex="10pt"/>
    </style:style>
    <style:style style:name="P3" style:family="paragraph" style:parent-style-name="Standard">
      <style:text-properties officeooo:paragraph-rsid="0102f218"/>
    </style:style>
    <style:style style:name="P4" style:family="paragraph" style:parent-style-name="Standard">
      <style:paragraph-properties fo:text-align="center" style:justify-single-word="false"/>
      <style:text-properties officeooo:rsid="010c4d6f" officeooo:paragraph-rsid="010c4d6f"/>
    </style:style>
    <style:style style:name="P5" style:family="paragraph" style:parent-style-name="Table_20_Contents">
      <style:paragraph-properties fo:text-align="center" style:justify-single-word="false"/>
      <style:text-properties fo:color="#127622" loext:opacity="100%" officeooo:rsid="01049846" officeooo:paragraph-rsid="01049846"/>
    </style:style>
    <style:style style:name="P6" style:family="paragraph" style:parent-style-name="Table_20_Contents">
      <style:paragraph-properties fo:text-align="center" style:justify-single-word="false"/>
      <style:text-properties officeooo:paragraph-rsid="01049846"/>
    </style:style>
    <style:style style:name="P7" style:family="paragraph" style:parent-style-name="Table_20_Contents">
      <style:paragraph-properties fo:text-align="center" style:justify-single-word="false"/>
      <style:text-properties officeooo:paragraph-rsid="0108b33e"/>
    </style:style>
    <style:style style:name="P8" style:family="paragraph" style:parent-style-name="Standard">
      <style:text-properties officeooo:paragraph-rsid="0125fd44"/>
    </style:style>
    <style:style style:name="P9" style:family="paragraph" style:parent-style-name="Standard" style:list-style-name="L1">
      <style:text-properties officeooo:paragraph-rsid="0125fd44"/>
    </style:style>
    <style:style style:name="P10" style:family="paragraph" style:parent-style-name="Standard" style:list-style-name="L1">
      <style:text-properties officeooo:rsid="012644e0" officeooo:paragraph-rsid="012644e0"/>
    </style:style>
    <style:style style:name="P11" style:family="paragraph" style:parent-style-name="Standard">
      <style:text-properties officeooo:rsid="012644e0" officeooo:paragraph-rsid="012644e0"/>
    </style:style>
    <style:style style:name="P12" style:family="paragraph" style:parent-style-name="Standard">
      <style:text-properties officeooo:rsid="0127a1ea" officeooo:paragraph-rsid="0127a1ea"/>
    </style:style>
    <style:style style:name="P13" style:family="paragraph" style:parent-style-name="Standard">
      <style:text-properties officeooo:rsid="010cae2b" officeooo:paragraph-rsid="010cae2b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0fe701" officeooo:paragraph-rsid="010fe701" style:font-weight-asian="bold" style:font-weight-complex="bold"/>
    </style:style>
    <style:style style:name="P16" style:family="paragraph" style:parent-style-name="Table_20_Contents">
      <style:text-properties fo:color="#127622" loext:opacity="100%"/>
    </style:style>
    <style:style style:name="P17" style:family="paragraph" style:parent-style-name="Table_20_Contents">
      <style:text-properties fo:color="#127622" loext:opacity="100%" officeooo:paragraph-rsid="01173b77"/>
    </style:style>
    <style:style style:name="P18" style:family="paragraph" style:parent-style-name="Table_20_Contents">
      <style:text-properties officeooo:paragraph-rsid="01173b77"/>
    </style:style>
    <style:style style:name="P19" style:family="paragraph" style:parent-style-name="Table_20_Contents">
      <style:text-properties style:use-window-font-color="true" loext:opacity="0%" officeooo:paragraph-rsid="01173b77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2935557" officeooo:paragraph-rsid="02935557" style:font-style-asian="italic" style:font-style-complex="italic"/>
    </style:style>
    <style:style style:name="P21" style:family="paragraph" style:parent-style-name="Table_20_Contents">
      <style:text-properties officeooo:paragraph-rsid="01a4812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29c6b21" officeooo:paragraph-rsid="029c6b21" style:font-weight-asian="bold" style:font-weight-complex="bold"/>
    </style:style>
    <style:style style:name="P23" style:family="paragraph" style:parent-style-name="Standard">
      <style:text-properties officeooo:rsid="02982df0" officeooo:paragraph-rsid="02982df0"/>
    </style:style>
    <style:style style:name="P24" style:family="paragraph" style:parent-style-name="Standard">
      <style:paragraph-properties fo:text-align="center" style:justify-single-word="false"/>
      <style:text-properties officeooo:paragraph-rsid="013701e1"/>
    </style:style>
    <style:style style:name="P25" style:family="paragraph" style:parent-style-name="Standard">
      <style:text-properties officeooo:rsid="011d8ee8" officeooo:paragraph-rsid="011cdf9b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Caption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Standard">
      <style:text-properties officeooo:rsid="00222952" officeooo:paragraph-rsid="004ea063"/>
    </style:style>
    <style:style style:name="P29" style:family="paragraph" style:parent-style-name="Standard">
      <style:paragraph-properties fo:text-align="center" style:justify-single-word="false"/>
      <style:text-properties officeooo:rsid="013b99b4" officeooo:paragraph-rsid="013b99b4"/>
    </style:style>
    <style:style style:name="P30" style:family="paragraph" style:parent-style-name="Standard">
      <style:paragraph-properties fo:text-align="center" style:justify-single-word="false"/>
      <style:text-properties officeooo:rsid="00222952" officeooo:paragraph-rsid="0025bc35"/>
    </style:style>
    <style:style style:name="P31" style:family="paragraph" style:parent-style-name="Standard">
      <style:text-properties officeooo:rsid="002ede3e" officeooo:paragraph-rsid="002ede3e"/>
    </style:style>
    <style:style style:name="P32" style:family="paragraph" style:parent-style-name="Standard">
      <style:text-properties officeooo:rsid="002ede3e" officeooo:paragraph-rsid="005162c9"/>
    </style:style>
    <style:style style:name="P33" style:family="paragraph" style:parent-style-name="Standard">
      <style:text-properties officeooo:rsid="00306380" officeooo:paragraph-rsid="00306380"/>
    </style:style>
    <style:style style:name="P34" style:family="paragraph" style:parent-style-name="Standard">
      <style:text-properties officeooo:paragraph-rsid="01a7bd80"/>
    </style:style>
    <style:style style:name="P35" style:family="paragraph" style:parent-style-name="Standard">
      <style:text-properties officeooo:rsid="0027b06b" officeooo:paragraph-rsid="00394d77"/>
    </style:style>
    <style:style style:name="P36" style:family="paragraph" style:parent-style-name="Standard">
      <style:paragraph-properties fo:text-align="center" style:justify-single-word="false"/>
      <style:text-properties officeooo:rsid="0027b06b" officeooo:paragraph-rsid="00394d77"/>
    </style:style>
    <style:style style:name="P37" style:family="paragraph" style:parent-style-name="Standard">
      <style:text-properties officeooo:paragraph-rsid="026f353b"/>
    </style:style>
    <style:style style:name="P38" style:family="paragraph" style:parent-style-name="Standard">
      <style:text-properties officeooo:rsid="00627c1b" officeooo:paragraph-rsid="007a03c1"/>
    </style:style>
    <style:style style:name="P39" style:family="paragraph" style:parent-style-name="Standard">
      <style:text-properties officeooo:rsid="020cc7c4" officeooo:paragraph-rsid="020cc7c4"/>
    </style:style>
    <style:style style:name="P40" style:family="paragraph" style:parent-style-name="Table_20_Contents">
      <style:text-properties fo:color="#127622" loext:opacity="100%" officeooo:paragraph-rsid="00b2f9d8"/>
    </style:style>
    <style:style style:name="P41" style:family="paragraph" style:parent-style-name="Table_20_Contents">
      <style:text-properties officeooo:paragraph-rsid="00b2f9d8"/>
    </style:style>
    <style:style style:name="P42" style:family="paragraph" style:parent-style-name="Standard">
      <style:text-properties officeooo:rsid="007facbe" officeooo:paragraph-rsid="00b2f9d8"/>
    </style:style>
    <style:style style:name="P43" style:family="paragraph" style:parent-style-name="Standard">
      <style:text-properties officeooo:rsid="007facbe" officeooo:paragraph-rsid="007135b7"/>
    </style:style>
    <style:style style:name="P44" style:family="paragraph" style:parent-style-name="Standard">
      <style:text-properties officeooo:rsid="00b2082a" officeooo:paragraph-rsid="00b2082a"/>
    </style:style>
    <style:style style:name="P45" style:family="paragraph" style:parent-style-name="Standard">
      <style:text-properties officeooo:rsid="00814077" officeooo:paragraph-rsid="00814077"/>
    </style:style>
    <style:style style:name="P46" style:family="paragraph" style:parent-style-name="Standard">
      <style:text-properties officeooo:rsid="007facbe" officeooo:paragraph-rsid="007facbe"/>
    </style:style>
    <style:style style:name="P47" style:family="paragraph" style:parent-style-name="Standard">
      <style:paragraph-properties fo:text-align="center" style:justify-single-word="false"/>
      <style:text-properties officeooo:rsid="007facbe" officeooo:paragraph-rsid="007facbe"/>
    </style:style>
    <style:style style:name="P48" style:family="paragraph" style:parent-style-name="Caption">
      <style:paragraph-properties fo:text-align="center" style:justify-single-word="false"/>
      <style:text-properties officeooo:paragraph-rsid="0287f83a"/>
    </style:style>
    <style:style style:name="P49" style:family="paragraph" style:parent-style-name="Standard">
      <style:text-properties officeooo:rsid="006e8fa9" officeooo:paragraph-rsid="007135b7"/>
    </style:style>
    <style:style style:name="P50" style:family="paragraph" style:parent-style-name="Standard">
      <style:text-properties officeooo:rsid="00848cc8" officeooo:paragraph-rsid="00848cc8"/>
    </style:style>
    <style:style style:name="P51" style:family="paragraph" style:parent-style-name="Standard">
      <style:text-properties officeooo:rsid="008780b2" officeooo:paragraph-rsid="00848cc8"/>
    </style:style>
    <style:style style:name="P52" style:family="paragraph" style:parent-style-name="Table_20_Contents">
      <style:text-properties officeooo:paragraph-rsid="02d51242"/>
    </style:style>
    <style:style style:name="P53" style:family="paragraph" style:parent-style-name="Table_20_Contents">
      <style:text-properties officeooo:paragraph-rsid="00bb4fed"/>
    </style:style>
    <style:style style:name="P54" style:family="paragraph" style:parent-style-name="Standard">
      <style:text-properties officeooo:paragraph-rsid="01b3279e"/>
    </style:style>
    <style:style style:name="P55" style:family="paragraph" style:parent-style-name="Standard">
      <style:paragraph-properties fo:text-align="center" style:justify-single-word="false"/>
      <style:text-properties officeooo:paragraph-rsid="01b3279e"/>
    </style:style>
    <style:style style:name="P56" style:family="paragraph" style:parent-style-name="Standard">
      <style:text-properties officeooo:paragraph-rsid="01c73546"/>
    </style:style>
    <style:style style:name="P57" style:family="paragraph" style:parent-style-name="Standard">
      <style:text-properties officeooo:rsid="01b403cb" officeooo:paragraph-rsid="01b403cb"/>
    </style:style>
    <style:style style:name="P58" style:family="paragraph" style:parent-style-name="Standard">
      <style:paragraph-properties fo:text-align="center" style:justify-single-word="false"/>
      <style:text-properties officeooo:rsid="01b403cb" officeooo:paragraph-rsid="01b403cb"/>
    </style:style>
    <style:style style:name="P59" style:family="paragraph" style:parent-style-name="Standard">
      <style:text-properties officeooo:paragraph-rsid="01d15ec9"/>
    </style:style>
    <style:style style:name="P60" style:family="paragraph" style:parent-style-name="Standard">
      <style:text-properties officeooo:rsid="01af3662" officeooo:paragraph-rsid="01af3662"/>
    </style:style>
    <style:style style:name="P61" style:family="paragraph" style:parent-style-name="Standard">
      <style:text-properties officeooo:rsid="01d3aedd" officeooo:paragraph-rsid="01d3aedd"/>
    </style:style>
    <style:style style:name="P62" style:family="paragraph" style:parent-style-name="Standard">
      <style:paragraph-properties fo:text-align="center" style:justify-single-word="false"/>
      <style:text-properties fo:font-weight="bold" officeooo:rsid="01dfdc15" officeooo:paragraph-rsid="01dfdc15" style:font-weight-asian="bold" style:font-weight-complex="bold"/>
    </style:style>
    <style:style style:name="P63" style:family="paragraph" style:parent-style-name="Standard" style:list-style-name="L2">
      <style:text-properties officeooo:paragraph-rsid="02e1b238"/>
    </style:style>
    <style:style style:name="P64" style:family="paragraph" style:parent-style-name="Standard" style:list-style-name="L2">
      <style:text-properties officeooo:rsid="01d6f35f" officeooo:paragraph-rsid="02e1b238"/>
    </style:style>
    <style:style style:name="P65" style:family="paragraph" style:parent-style-name="Standard" style:list-style-name="L2">
      <style:text-properties officeooo:rsid="01dc8c6d" officeooo:paragraph-rsid="02e1b238"/>
    </style:style>
    <style:style style:name="P66" style:family="paragraph" style:parent-style-name="Standard" style:list-style-name="L2">
      <style:text-properties officeooo:rsid="02de9223" officeooo:paragraph-rsid="02e1b238"/>
    </style:style>
    <style:style style:name="P67" style:family="paragraph" style:parent-style-name="Standard">
      <style:text-properties officeooo:rsid="01af3662" officeooo:paragraph-rsid="01d6f35f"/>
    </style:style>
    <style:style style:name="P68" style:family="paragraph" style:parent-style-name="Standard">
      <style:text-properties officeooo:rsid="02e468e5" officeooo:paragraph-rsid="02eb1cc3"/>
    </style:style>
    <style:style style:name="P69" style:family="paragraph" style:parent-style-name="Standard">
      <style:text-properties officeooo:paragraph-rsid="02eb1cc3"/>
    </style:style>
    <style:style style:name="P70" style:family="paragraph" style:parent-style-name="Standard">
      <style:text-properties officeooo:rsid="00c2b808" officeooo:paragraph-rsid="0221a4e1"/>
    </style:style>
    <style:style style:name="P71" style:family="paragraph" style:parent-style-name="Standard">
      <style:text-properties officeooo:rsid="00c2b808" officeooo:paragraph-rsid="01e50c03"/>
    </style:style>
    <style:style style:name="P72" style:family="paragraph" style:parent-style-name="Standard">
      <style:text-properties officeooo:rsid="00ddfd9e" officeooo:paragraph-rsid="02f05b31"/>
    </style:style>
    <style:style style:name="P73" style:family="paragraph" style:parent-style-name="Standard">
      <style:text-properties officeooo:rsid="00e5fb86" officeooo:paragraph-rsid="00fddc4b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1f07d82" officeooo:paragraph-rsid="01f07d82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0pt" fo:font-weight="bold" officeooo:rsid="01f07d82" officeooo:paragraph-rsid="01f07d82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officeooo:rsid="016eb8a0" officeooo:paragraph-rsid="016eb8a0"/>
    </style:style>
    <style:style style:name="P77" style:family="paragraph" style:parent-style-name="Standard">
      <style:paragraph-properties fo:text-align="center" style:justify-single-word="false"/>
      <style:text-properties fo:font-size="14pt" officeooo:rsid="00dfde36" officeooo:paragraph-rsid="016eb8a0" style:font-size-asian="14pt" style:font-name-complex="Galaxie Unicode Hebrew" style:font-size-complex="14pt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  <style:text-properties fo:font-size="14pt" style:font-size-asian="14pt" style:font-name-complex="Galaxie Unicode Hebrew" style:font-size-complex="14pt"/>
    </style:style>
    <style:style style:name="P80" style:family="paragraph" style:parent-style-name="Standard">
      <style:text-properties officeooo:rsid="00848cc8" officeooo:paragraph-rsid="00e12ce6"/>
    </style:style>
    <style:style style:name="P81" style:family="paragraph" style:parent-style-name="Standard">
      <style:text-properties officeooo:rsid="00e5fb86" officeooo:paragraph-rsid="02f29bfd"/>
    </style:style>
    <style:style style:name="P82" style:family="paragraph" style:parent-style-name="Standard">
      <style:text-properties officeooo:rsid="00e5fb86" officeooo:paragraph-rsid="01891675"/>
    </style:style>
    <style:style style:name="P83" style:family="paragraph" style:parent-style-name="Standard">
      <style:text-properties officeooo:paragraph-rsid="018295bb"/>
    </style:style>
    <style:style style:name="P84" style:family="paragraph" style:parent-style-name="Standard">
      <style:text-properties officeooo:rsid="00ddfd9e" officeooo:paragraph-rsid="02342bbd"/>
    </style:style>
    <style:style style:name="P85" style:family="paragraph" style:parent-style-name="Standard">
      <style:text-properties officeooo:rsid="02342bbd" officeooo:paragraph-rsid="02342bbd"/>
    </style:style>
    <style:style style:name="P86" style:family="paragraph" style:parent-style-name="Standard">
      <style:paragraph-properties fo:text-align="center" style:justify-single-word="false"/>
      <style:text-properties officeooo:rsid="02342bbd" officeooo:paragraph-rsid="02342bbd"/>
    </style:style>
    <style:style style:name="P87" style:family="paragraph" style:parent-style-name="Standard">
      <style:paragraph-properties fo:text-align="center" style:justify-single-word="false"/>
      <style:text-properties officeooo:rsid="0236f83f" officeooo:paragraph-rsid="0236f83f"/>
    </style:style>
    <style:style style:name="P88" style:family="paragraph" style:parent-style-name="Standard">
      <style:paragraph-properties fo:text-align="center" style:justify-single-word="false"/>
      <style:text-properties officeooo:paragraph-rsid="0236f83f"/>
    </style:style>
    <style:style style:name="P89" style:family="paragraph" style:parent-style-name="Standard">
      <style:paragraph-properties fo:text-align="center" style:justify-single-word="false"/>
      <style:text-properties officeooo:paragraph-rsid="02847ed3"/>
    </style:style>
    <style:style style:name="P90" style:family="paragraph" style:parent-style-name="Standard">
      <style:paragraph-properties fo:text-align="center" style:justify-single-word="false"/>
      <style:text-properties fo:font-size="10pt" officeooo:rsid="02835c94" officeooo:paragraph-rsid="02847ed3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24df6b0" officeooo:paragraph-rsid="02847ed3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officeooo:rsid="0248c246" officeooo:paragraph-rsid="02847ed3"/>
    </style:style>
    <style:style style:name="P93" style:family="paragraph" style:parent-style-name="Table_20_Contents">
      <style:paragraph-properties fo:text-align="center" style:justify-single-word="false"/>
      <style:text-properties officeooo:paragraph-rsid="02847ed3"/>
    </style:style>
    <style:style style:name="P94" style:family="paragraph" style:parent-style-name="Standard">
      <style:text-properties officeooo:paragraph-rsid="02847ed3"/>
    </style:style>
    <style:style style:name="T1" style:family="text">
      <style:text-properties officeooo:rsid="0035e9b2"/>
    </style:style>
    <style:style style:name="T2" style:family="text">
      <style:text-properties style:font-name="Gabriela" officeooo:rsid="02957289"/>
    </style:style>
    <style:style style:name="T3" style:family="text">
      <style:text-properties style:font-name="Gabriela" officeooo:rsid="028bb752"/>
    </style:style>
    <style:style style:name="T4" style:family="text">
      <style:text-properties officeooo:rsid="0102f218"/>
    </style:style>
    <style:style style:name="T5" style:family="text">
      <style:text-properties officeooo:rsid="01071ca8"/>
    </style:style>
    <style:style style:name="T6" style:family="text">
      <style:text-properties officeooo:rsid="02980c50"/>
    </style:style>
    <style:style style:name="T7" style:family="text">
      <style:text-properties fo:color="#127622" loext:opacity="100%" officeooo:rsid="0102f218"/>
    </style:style>
    <style:style style:name="T8" style:family="text">
      <style:text-properties fo:color="#127622" loext:opacity="100%" officeooo:rsid="01049846"/>
    </style:style>
    <style:style style:name="T9" style:family="text">
      <style:text-properties fo:color="#127622" loext:opacity="100%" officeooo:rsid="01054f88"/>
    </style:style>
    <style:style style:name="T10" style:family="text">
      <style:text-properties fo:color="#127622" loext:opacity="100%" officeooo:rsid="01076437"/>
    </style:style>
    <style:style style:name="T11" style:family="text">
      <style:text-properties fo:color="#127622" loext:opacity="100%" officeooo:rsid="0108b33e"/>
    </style:style>
    <style:style style:name="T12" style:family="text">
      <style:text-properties fo:color="#127622" loext:opacity="100%" officeooo:rsid="0108efff"/>
    </style:style>
    <style:style style:name="T13" style:family="text">
      <style:text-properties fo:color="#127622" loext:opacity="100%" officeooo:rsid="01092d79"/>
    </style:style>
    <style:style style:name="T14" style:family="text">
      <style:text-properties officeooo:rsid="010e0f59"/>
    </style:style>
    <style:style style:name="T15" style:family="text">
      <style:text-properties officeooo:rsid="028ec95f"/>
    </style:style>
    <style:style style:name="T16" style:family="text">
      <style:text-properties officeooo:rsid="01f8c97e"/>
    </style:style>
    <style:style style:name="T17" style:family="text">
      <style:text-properties officeooo:rsid="0125fd44"/>
    </style:style>
    <style:style style:name="T18" style:family="text">
      <style:text-properties officeooo:rsid="028eb572"/>
    </style:style>
    <style:style style:name="T19" style:family="text">
      <style:text-properties officeooo:rsid="02a117f5"/>
    </style:style>
    <style:style style:name="T20" style:family="text">
      <style:text-properties fo:font-weight="bold" officeooo:rsid="0125fd44" style:font-weight-asian="bold" style:font-weight-complex="bold"/>
    </style:style>
    <style:style style:name="T21" style:family="text">
      <style:text-properties officeooo:rsid="0127a1ea"/>
    </style:style>
    <style:style style:name="T22" style:family="text">
      <style:text-properties officeooo:rsid="02a20e34"/>
    </style:style>
    <style:style style:name="T23" style:family="text">
      <style:text-properties fo:font-weight="bold" officeooo:rsid="0127a1ea" style:font-weight-asian="bold" style:font-weight-complex="bold"/>
    </style:style>
    <style:style style:name="T24" style:family="text">
      <style:text-properties officeooo:rsid="024fea97"/>
    </style:style>
    <style:style style:name="T25" style:family="text">
      <style:text-properties officeooo:rsid="02508659"/>
    </style:style>
    <style:style style:name="T26" style:family="text">
      <style:text-properties officeooo:rsid="02527d8e"/>
    </style:style>
    <style:style style:name="T27" style:family="text">
      <style:text-properties officeooo:rsid="028f3ba5"/>
    </style:style>
    <style:style style:name="T28" style:family="text">
      <style:text-properties officeooo:rsid="02541eb1"/>
    </style:style>
    <style:style style:name="T29" style:family="text">
      <style:text-properties officeooo:rsid="025565bc"/>
    </style:style>
    <style:style style:name="T30" style:family="text">
      <style:text-properties style:text-position="super 58%" officeooo:rsid="0111d5c6"/>
    </style:style>
    <style:style style:name="T31" style:family="text">
      <style:text-properties style:text-position="super 58%" fo:font-style="italic" officeooo:rsid="0111d5c6" style:font-style-asian="italic" style:font-style-complex="italic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1157833"/>
    </style:style>
    <style:style style:name="T34" style:family="text">
      <style:text-properties style:text-position="super 58%" officeooo:rsid="01157833"/>
    </style:style>
    <style:style style:name="T35" style:family="text">
      <style:text-properties fo:background-color="transparent" loext:char-shading-value="0"/>
    </style:style>
    <style:style style:name="T36" style:family="text">
      <style:text-properties fo:color="#ff0000" loext:opacity="100%" fo:background-color="transparent" loext:char-shading-value="0"/>
    </style:style>
    <style:style style:name="T37" style:family="text">
      <style:text-properties fo:color="#ff0000" loext:opacity="100%" fo:background-color="#ffff00" loext:char-shading-value="0"/>
    </style:style>
    <style:style style:name="T38" style:family="text">
      <style:text-properties fo:color="#ff0000" loext:opacity="100%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1fe44ef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1a2a865" style:font-size-asian="10pt" style:font-size-complex="10pt"/>
    </style:style>
    <style:style style:name="T43" style:family="text">
      <style:text-properties fo:color="#127622" loext:opacity="100%" fo:font-size="10pt" officeooo:rsid="01a2a865" style:font-size-asian="10pt" style:font-size-complex="10pt"/>
    </style:style>
    <style:style style:name="T44" style:family="text">
      <style:text-properties fo:color="#127622" loext:opacity="100%"/>
    </style:style>
    <style:style style:name="T45" style:family="text">
      <style:text-properties fo:font-size="10pt" officeooo:rsid="02a27074" style:font-size-asian="10pt" style:font-size-complex="10pt"/>
    </style:style>
    <style:style style:name="T46" style:family="text">
      <style:text-properties fo:font-size="10pt" officeooo:rsid="0294b806" style:font-size-asian="10pt" style:font-size-complex="10pt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29ca0ab"/>
    </style:style>
    <style:style style:name="T49" style:family="text">
      <style:text-properties officeooo:rsid="02a06943"/>
    </style:style>
    <style:style style:name="T50" style:family="text">
      <style:text-properties officeooo:rsid="02ab0c1f"/>
    </style:style>
    <style:style style:name="T51" style:family="text">
      <style:text-properties fo:color="#127622" loext:opacity="100%" officeooo:rsid="02ab0c1f"/>
    </style:style>
    <style:style style:name="T52" style:family="text">
      <style:text-properties officeooo:rsid="013701e1"/>
    </style:style>
    <style:style style:name="T53" style:family="text">
      <style:text-properties officeooo:rsid="002d359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33b6f5"/>
    </style:style>
    <style:style style:name="T56" style:family="text">
      <style:text-properties officeooo:rsid="0139f204"/>
    </style:style>
    <style:style style:name="T57" style:family="text">
      <style:text-properties fo:font-weight="bold" officeooo:rsid="0033b6f5" style:font-weight-asian="bold" style:font-weight-complex="bold"/>
    </style:style>
    <style:style style:name="T58" style:family="text">
      <style:text-properties fo:font-weight="bold" officeooo:rsid="00a42a19" style:font-weight-asian="bold" style:font-weight-complex="bold"/>
    </style:style>
    <style:style style:name="T59" style:family="text">
      <style:text-properties fo:font-weight="bold" officeooo:rsid="025871c2" style:font-weight-asian="bold" style:font-weight-complex="bold"/>
    </style:style>
    <style:style style:name="T60" style:family="text">
      <style:text-properties officeooo:rsid="0255e3de"/>
    </style:style>
    <style:style style:name="T61" style:family="text">
      <style:text-properties officeooo:rsid="02560a56"/>
    </style:style>
    <style:style style:name="T62" style:family="text">
      <style:text-properties officeooo:rsid="025a316c"/>
    </style:style>
    <style:style style:name="T63" style:family="text">
      <style:text-properties officeooo:rsid="02578c20"/>
    </style:style>
    <style:style style:name="T64" style:family="text">
      <style:text-properties officeooo:rsid="02ae6fd0"/>
    </style:style>
    <style:style style:name="T65" style:family="text">
      <style:text-properties officeooo:rsid="007b4a0e"/>
    </style:style>
    <style:style style:name="T66" style:family="text">
      <style:text-properties officeooo:rsid="02b029d4"/>
    </style:style>
    <style:style style:name="T67" style:family="text">
      <style:text-properties officeooo:rsid="005162c9"/>
    </style:style>
    <style:style style:name="T68" style:family="text">
      <style:text-properties officeooo:rsid="00a6d867"/>
    </style:style>
    <style:style style:name="T69" style:family="text">
      <style:text-properties fo:font-style="italic" officeooo:rsid="00a6d867" style:font-style-asian="italic" style:font-style-complex="italic"/>
    </style:style>
    <style:style style:name="T70" style:family="text">
      <style:text-properties officeooo:rsid="025a859a"/>
    </style:style>
    <style:style style:name="T71" style:family="text">
      <style:text-properties officeooo:rsid="00323116"/>
    </style:style>
    <style:style style:name="T72" style:family="text">
      <style:text-properties officeooo:rsid="00338412"/>
    </style:style>
    <style:style style:name="T73" style:family="text">
      <style:text-properties officeooo:rsid="013d5520"/>
    </style:style>
    <style:style style:name="T74" style:family="text">
      <style:text-properties officeooo:rsid="00a9644f"/>
    </style:style>
    <style:style style:name="T75" style:family="text">
      <style:text-properties officeooo:rsid="00377d77"/>
    </style:style>
    <style:style style:name="T76" style:family="text">
      <style:text-properties officeooo:rsid="0027b06b"/>
    </style:style>
    <style:style style:name="T77" style:family="text">
      <style:text-properties fo:font-weight="normal" officeooo:rsid="0027b06b" style:font-weight-asian="normal" style:font-weight-complex="normal"/>
    </style:style>
    <style:style style:name="T78" style:family="text">
      <style:text-properties fo:color="#127622" loext:opacity="100%" officeooo:rsid="00355e8a"/>
    </style:style>
    <style:style style:name="T79" style:family="text">
      <style:text-properties officeooo:rsid="00355e8a"/>
    </style:style>
    <style:style style:name="T80" style:family="text">
      <style:text-properties fo:color="#127622" loext:opacity="100%" officeooo:rsid="0027b06b" fo:background-color="transparent" loext:char-shading-value="0"/>
    </style:style>
    <style:style style:name="T81" style:family="text">
      <style:text-properties officeooo:rsid="00497f78"/>
    </style:style>
    <style:style style:name="T82" style:family="text">
      <style:text-properties officeooo:rsid="003cd525"/>
    </style:style>
    <style:style style:name="T83" style:family="text">
      <style:text-properties officeooo:rsid="025c5914"/>
    </style:style>
    <style:style style:name="T84" style:family="text">
      <style:text-properties officeooo:rsid="02706ec1"/>
    </style:style>
    <style:style style:name="T85" style:family="text">
      <style:text-properties officeooo:rsid="003da14e"/>
    </style:style>
    <style:style style:name="T86" style:family="text">
      <style:text-properties officeooo:rsid="003e7bc0"/>
    </style:style>
    <style:style style:name="T87" style:family="text">
      <style:text-properties fo:color="#127622" loext:opacity="100%" officeooo:rsid="003e7bc0"/>
    </style:style>
    <style:style style:name="T88" style:family="text">
      <style:text-properties fo:color="#127622" loext:opacity="100%" officeooo:rsid="005ec148"/>
    </style:style>
    <style:style style:name="T89" style:family="text">
      <style:text-properties officeooo:rsid="005ec148"/>
    </style:style>
    <style:style style:name="T90" style:family="text">
      <style:text-properties officeooo:rsid="006117f6"/>
    </style:style>
    <style:style style:name="T91" style:family="text">
      <style:text-properties fo:font-style="italic" officeooo:rsid="005ec148" style:font-style-asian="italic" style:font-style-complex="italic"/>
    </style:style>
    <style:style style:name="T92" style:family="text">
      <style:text-properties fo:font-style="italic" officeooo:rsid="02b1ded7" style:font-style-asian="italic" style:font-style-complex="italic"/>
    </style:style>
    <style:style style:name="T93" style:family="text">
      <style:text-properties fo:font-style="normal" officeooo:rsid="027218df" style:font-style-asian="normal" style:font-style-complex="normal"/>
    </style:style>
    <style:style style:name="T94" style:family="text">
      <style:text-properties fo:font-style="normal" officeooo:rsid="02b174a1" style:font-style-asian="normal" style:font-style-complex="normal"/>
    </style:style>
    <style:style style:name="T95" style:family="text">
      <style:text-properties officeooo:rsid="005fba67"/>
    </style:style>
    <style:style style:name="T96" style:family="text">
      <style:text-properties officeooo:rsid="01a66f5f"/>
    </style:style>
    <style:style style:name="T97" style:family="text">
      <style:text-properties officeooo:rsid="020618f9"/>
    </style:style>
    <style:style style:name="T98" style:family="text">
      <style:text-properties fo:color="#127622" loext:opacity="100%" officeooo:rsid="01a66f5f"/>
    </style:style>
    <style:style style:name="T99" style:family="text">
      <style:text-properties fo:font-style="normal" fo:font-weight="normal" officeooo:rsid="005fba67" style:font-style-asian="normal" style:font-weight-asian="normal" style:font-style-complex="normal" style:font-weight-complex="normal"/>
    </style:style>
    <style:style style:name="T100" style:family="text">
      <style:text-properties officeooo:rsid="0260e4e3"/>
    </style:style>
    <style:style style:name="T101" style:family="text">
      <style:text-properties officeooo:rsid="02c11601"/>
    </style:style>
    <style:style style:name="T102" style:family="text">
      <style:text-properties officeooo:rsid="02b24385"/>
    </style:style>
    <style:style style:name="T103" style:family="text">
      <style:text-properties officeooo:rsid="02c13ffa"/>
    </style:style>
    <style:style style:name="T104" style:family="text">
      <style:text-properties officeooo:rsid="0140425e"/>
    </style:style>
    <style:style style:name="T105" style:family="text">
      <style:text-properties officeooo:rsid="00f15cbc"/>
    </style:style>
    <style:style style:name="T106" style:family="text">
      <style:text-properties officeooo:rsid="00adf933"/>
    </style:style>
    <style:style style:name="T107" style:family="text">
      <style:text-properties officeooo:rsid="00627c1b"/>
    </style:style>
    <style:style style:name="T108" style:family="text">
      <style:text-properties officeooo:rsid="0063a468"/>
    </style:style>
    <style:style style:name="T109" style:family="text">
      <style:text-properties officeooo:rsid="020653c4"/>
    </style:style>
    <style:style style:name="T110" style:family="text">
      <style:text-properties officeooo:rsid="020a6745"/>
    </style:style>
    <style:style style:name="T111" style:family="text">
      <style:text-properties officeooo:rsid="0261efb8"/>
    </style:style>
    <style:style style:name="T112" style:family="text">
      <style:text-properties officeooo:rsid="02bb1666"/>
    </style:style>
    <style:style style:name="T113" style:family="text">
      <style:text-properties officeooo:rsid="02bc338b"/>
    </style:style>
    <style:style style:name="T114" style:family="text">
      <style:text-properties officeooo:rsid="02bb5bba"/>
    </style:style>
    <style:style style:name="T115" style:family="text">
      <style:text-properties officeooo:rsid="02c2c886"/>
    </style:style>
    <style:style style:name="T116" style:family="text">
      <style:text-properties fo:color="#127622" loext:opacity="100%" officeooo:rsid="02c3ce03"/>
    </style:style>
    <style:style style:name="T117" style:family="text">
      <style:text-properties officeooo:rsid="0055e85f"/>
    </style:style>
    <style:style style:name="T118" style:family="text">
      <style:text-properties officeooo:rsid="02bdb54f"/>
    </style:style>
    <style:style style:name="T119" style:family="text">
      <style:text-properties officeooo:rsid="0057682c"/>
    </style:style>
    <style:style style:name="T120" style:family="text">
      <style:text-properties officeooo:rsid="008ec4dd"/>
    </style:style>
    <style:style style:name="T121" style:family="text">
      <style:text-properties fo:color="#127622" loext:opacity="100%" officeooo:rsid="008ec4dd"/>
    </style:style>
    <style:style style:name="T122" style:family="text">
      <style:text-properties officeooo:rsid="00669160"/>
    </style:style>
    <style:style style:name="T123" style:family="text">
      <style:text-properties officeooo:rsid="00773105"/>
    </style:style>
    <style:style style:name="T124" style:family="text">
      <style:text-properties fo:color="#127622" loext:opacity="100%" officeooo:rsid="00773105"/>
    </style:style>
    <style:style style:name="T125" style:family="text">
      <style:text-properties fo:color="#127622" loext:opacity="100%" officeooo:rsid="00aef248"/>
    </style:style>
    <style:style style:name="T126" style:family="text">
      <style:text-properties officeooo:rsid="00584139"/>
    </style:style>
    <style:style style:name="T127" style:family="text">
      <style:text-properties officeooo:rsid="0075a987"/>
    </style:style>
    <style:style style:name="T128" style:family="text">
      <style:text-properties officeooo:rsid="02c54148"/>
    </style:style>
    <style:style style:name="T129" style:family="text">
      <style:text-properties fo:color="#127622" loext:opacity="100%" officeooo:rsid="02c54148"/>
    </style:style>
    <style:style style:name="T130" style:family="text">
      <style:text-properties officeooo:rsid="02c729fe"/>
    </style:style>
    <style:style style:name="T131" style:family="text">
      <style:text-properties style:use-window-font-color="true" loext:opacity="0%"/>
    </style:style>
    <style:style style:name="T132" style:family="text">
      <style:text-properties style:use-window-font-color="true" loext:opacity="0%" fo:background-color="#ffff00" loext:char-shading-value="0"/>
    </style:style>
    <style:style style:name="T133" style:family="text">
      <style:text-properties officeooo:rsid="00d3c318"/>
    </style:style>
    <style:style style:name="T134" style:family="text">
      <style:text-properties officeooo:rsid="0082cf09"/>
    </style:style>
    <style:style style:name="T135" style:family="text">
      <style:text-properties officeooo:rsid="008613fe"/>
    </style:style>
    <style:style style:name="T136" style:family="text">
      <style:text-properties officeooo:rsid="02d85b51"/>
    </style:style>
    <style:style style:name="T137" style:family="text">
      <style:text-properties officeooo:rsid="008a9dd6"/>
    </style:style>
    <style:style style:name="T138" style:family="text">
      <style:text-properties officeooo:rsid="02fa38f3"/>
    </style:style>
    <style:style style:name="T139" style:family="text">
      <style:text-properties officeooo:rsid="02112ebf"/>
    </style:style>
    <style:style style:name="T140" style:family="text">
      <style:text-properties fo:font-size="8pt" fo:font-weight="normal" style:font-size-asian="8pt" style:font-weight-asian="normal" style:font-size-complex="8pt" style:font-weight-complex="normal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officeooo:rsid="021263dc"/>
    </style:style>
    <style:style style:name="T143" style:family="text">
      <style:text-properties fo:font-weight="bold" officeooo:rsid="021263dc" style:font-weight-asian="bold" style:font-weight-complex="bold"/>
    </style:style>
    <style:style style:name="T144" style:family="text">
      <style:text-properties officeooo:rsid="00be6827"/>
    </style:style>
    <style:style style:name="T145" style:family="text">
      <style:text-properties officeooo:rsid="0085b113"/>
    </style:style>
    <style:style style:name="T146" style:family="text">
      <style:text-properties fo:color="#127622" loext:opacity="100%" officeooo:rsid="00be6827"/>
    </style:style>
    <style:style style:name="T147" style:family="text">
      <style:text-properties fo:color="#127622" loext:opacity="100%" officeooo:rsid="02cb10c9"/>
    </style:style>
    <style:style style:name="T148" style:family="text">
      <style:text-properties officeooo:rsid="00bfefce"/>
    </style:style>
    <style:style style:name="T149" style:family="text">
      <style:text-properties officeooo:rsid="008780b2"/>
    </style:style>
    <style:style style:name="T150" style:family="text">
      <style:text-properties officeooo:rsid="00f75184"/>
    </style:style>
    <style:style style:name="T151" style:family="text">
      <style:text-properties officeooo:rsid="02df5255"/>
    </style:style>
    <style:style style:name="T152" style:family="text">
      <style:text-properties officeooo:rsid="00b5dc11"/>
    </style:style>
    <style:style style:name="T153" style:family="text">
      <style:text-properties officeooo:rsid="00d66333"/>
    </style:style>
    <style:style style:name="T154" style:family="text">
      <style:text-properties officeooo:rsid="00d4e45b"/>
    </style:style>
    <style:style style:name="T155" style:family="text">
      <style:text-properties officeooo:rsid="02e06250"/>
    </style:style>
    <style:style style:name="T156" style:family="text">
      <style:text-properties officeooo:rsid="01b1e084"/>
    </style:style>
    <style:style style:name="T157" style:family="text">
      <style:text-properties fo:font-style="italic" officeooo:rsid="01b1e084" style:font-style-asian="italic" style:font-style-complex="italic"/>
    </style:style>
    <style:style style:name="T158" style:family="text">
      <style:text-properties fo:color="#127622" loext:opacity="100%" officeooo:rsid="01b1e084"/>
    </style:style>
    <style:style style:name="T159" style:family="text">
      <style:text-properties fo:font-style="italic" officeooo:rsid="01c100de" style:font-style-asian="italic" style:font-style-complex="italic"/>
    </style:style>
    <style:style style:name="T160" style:family="text">
      <style:text-properties officeooo:rsid="01b3279e"/>
    </style:style>
    <style:style style:name="T161" style:family="text">
      <style:text-properties officeooo:rsid="01df3c82"/>
    </style:style>
    <style:style style:name="T162" style:family="text">
      <style:text-properties fo:font-style="italic" officeooo:rsid="01b3279e" style:font-style-asian="italic" style:font-style-complex="italic"/>
    </style:style>
    <style:style style:name="T163" style:family="text">
      <style:text-properties officeooo:rsid="01b6dfb3"/>
    </style:style>
    <style:style style:name="T164" style:family="text">
      <style:text-properties fo:color="#127622" loext:opacity="100%" officeooo:rsid="01b3279e"/>
    </style:style>
    <style:style style:name="T165" style:family="text">
      <style:text-properties fo:color="#127622" loext:opacity="100%" officeooo:rsid="01b6dfb3"/>
    </style:style>
    <style:style style:name="T166" style:family="text">
      <style:text-properties officeooo:rsid="01b6e7ed"/>
    </style:style>
    <style:style style:name="T167" style:family="text">
      <style:text-properties officeooo:rsid="0277bba0"/>
    </style:style>
    <style:style style:name="T168" style:family="text">
      <style:text-properties fo:font-style="italic" officeooo:rsid="01b6e7ed" style:font-style-asian="italic" style:font-style-complex="italic"/>
    </style:style>
    <style:style style:name="T169" style:family="text">
      <style:text-properties officeooo:rsid="01c73546"/>
    </style:style>
    <style:style style:name="T170" style:family="text">
      <style:text-properties fo:color="#127622" loext:opacity="100%" officeooo:rsid="01c73546"/>
    </style:style>
    <style:style style:name="T171" style:family="text">
      <style:text-properties fo:color="#127622" loext:opacity="100%" officeooo:rsid="01b6e7ed"/>
    </style:style>
    <style:style style:name="T172" style:family="text">
      <style:text-properties officeooo:rsid="02dd1c53"/>
    </style:style>
    <style:style style:name="T173" style:family="text">
      <style:text-properties fo:color="#127622" loext:opacity="100%" officeooo:rsid="02dd1c53"/>
    </style:style>
    <style:style style:name="T174" style:family="text">
      <style:text-properties officeooo:rsid="01b882d2"/>
    </style:style>
    <style:style style:name="T175" style:family="text">
      <style:text-properties fo:font-style="italic" officeooo:rsid="01b882d2" style:font-style-asian="italic" style:font-style-complex="italic"/>
    </style:style>
    <style:style style:name="T176" style:family="text">
      <style:text-properties fo:color="#127622" loext:opacity="100%" officeooo:rsid="01b882d2"/>
    </style:style>
    <style:style style:name="T177" style:family="text">
      <style:text-properties officeooo:rsid="01b403cb"/>
    </style:style>
    <style:style style:name="T178" style:family="text">
      <style:text-properties officeooo:rsid="01d3c8b3"/>
    </style:style>
    <style:style style:name="T179" style:family="text">
      <style:text-properties officeooo:rsid="01ce78ed"/>
    </style:style>
    <style:style style:name="T180" style:family="text">
      <style:text-properties officeooo:rsid="01cec277"/>
    </style:style>
    <style:style style:name="T181" style:family="text">
      <style:text-properties officeooo:rsid="01cf22a8"/>
    </style:style>
    <style:style style:name="T182" style:family="text">
      <style:text-properties officeooo:rsid="01af3662"/>
    </style:style>
    <style:style style:name="T183" style:family="text">
      <style:text-properties officeooo:rsid="01d05882"/>
    </style:style>
    <style:style style:name="T184" style:family="text">
      <style:text-properties officeooo:rsid="01d15ec9"/>
    </style:style>
    <style:style style:name="T185" style:family="text">
      <style:text-properties officeooo:rsid="02faa936"/>
    </style:style>
    <style:style style:name="T186" style:family="text">
      <style:text-properties fo:color="#127622" loext:opacity="100%" officeooo:rsid="01cf22a8"/>
    </style:style>
    <style:style style:name="T187" style:family="text">
      <style:text-properties fo:color="#127622" loext:opacity="100%" officeooo:rsid="01d05882"/>
    </style:style>
    <style:style style:name="T188" style:family="text">
      <style:text-properties fo:color="#127622" loext:opacity="100%" officeooo:rsid="01d2e9d4"/>
    </style:style>
    <style:style style:name="T189" style:family="text">
      <style:text-properties officeooo:rsid="01df6efa"/>
    </style:style>
    <style:style style:name="T190" style:family="text">
      <style:text-properties officeooo:rsid="01dfd6f4"/>
    </style:style>
    <style:style style:name="T191" style:family="text">
      <style:text-properties officeooo:rsid="02db73bb"/>
    </style:style>
    <style:style style:name="T192" style:family="text">
      <style:text-properties fo:color="#127622" loext:opacity="100%" officeooo:rsid="02db73bb"/>
    </style:style>
    <style:style style:name="T193" style:family="text">
      <style:text-properties officeooo:rsid="021e11a5"/>
    </style:style>
    <style:style style:name="T194" style:family="text">
      <style:text-properties officeooo:rsid="01d5490b"/>
    </style:style>
    <style:style style:name="T195" style:family="text">
      <style:text-properties officeooo:rsid="01dc8c6d"/>
    </style:style>
    <style:style style:name="T196" style:family="text">
      <style:text-properties officeooo:rsid="01d6f35f"/>
    </style:style>
    <style:style style:name="T197" style:family="text">
      <style:text-properties fo:font-style="italic" officeooo:rsid="01d982d5" style:font-style-asian="italic" style:font-style-complex="italic"/>
    </style:style>
    <style:style style:name="T198" style:family="text">
      <style:text-properties officeooo:rsid="01da16ff"/>
    </style:style>
    <style:style style:name="T199" style:family="text">
      <style:text-properties officeooo:rsid="02e5c44d"/>
    </style:style>
    <style:style style:name="T200" style:family="text">
      <style:text-properties officeooo:rsid="02eb1cc3"/>
    </style:style>
    <style:style style:name="T201" style:family="text">
      <style:text-properties officeooo:rsid="00c7aa2e"/>
    </style:style>
    <style:style style:name="T202" style:family="text">
      <style:text-properties fo:color="#127622" loext:opacity="100%" officeooo:rsid="00c7aa2e"/>
    </style:style>
    <style:style style:name="T203" style:family="text">
      <style:text-properties officeooo:rsid="02ee8ca7"/>
    </style:style>
    <style:style style:name="T204" style:family="text">
      <style:text-properties officeooo:rsid="00c5905b"/>
    </style:style>
    <style:style style:name="T205" style:family="text">
      <style:text-properties fo:font-weight="normal" officeooo:rsid="00c5905b" style:font-weight-asian="normal" style:font-weight-complex="normal"/>
    </style:style>
    <style:style style:name="T206" style:family="text">
      <style:text-properties officeooo:rsid="00cfd75c"/>
    </style:style>
    <style:style style:name="T207" style:family="text">
      <style:text-properties officeooo:rsid="00cdf4d5"/>
    </style:style>
    <style:style style:name="T208" style:family="text">
      <style:text-properties officeooo:rsid="00db1d1a"/>
    </style:style>
    <style:style style:name="T209" style:family="text">
      <style:text-properties officeooo:rsid="00cc3547"/>
    </style:style>
    <style:style style:name="T210" style:family="text">
      <style:text-properties officeooo:rsid="00e26326"/>
    </style:style>
    <style:style style:name="T211" style:family="text">
      <style:text-properties style:text-position="super 58%" officeooo:rsid="00e26326"/>
    </style:style>
    <style:style style:name="T212" style:family="text">
      <style:text-properties officeooo:rsid="00ca3965"/>
    </style:style>
    <style:style style:name="T213" style:family="text">
      <style:text-properties officeooo:rsid="00e5fb86"/>
    </style:style>
    <style:style style:name="T214" style:family="text">
      <style:text-properties style:text-underline-style="none"/>
    </style:style>
    <style:style style:name="T215" style:family="text">
      <style:text-properties fo:color="#ff0000" loext:opacity="100%" style:text-underline-style="none" officeooo:rsid="0180e3be"/>
    </style:style>
    <style:style style:name="T216" style:family="text">
      <style:text-properties fo:color="#ff0000" loext:opacity="100%" style:text-underline-style="none" officeooo:rsid="018295bb"/>
    </style:style>
    <style:style style:name="T217" style:family="text">
      <style:text-properties officeooo:rsid="0183cc0e"/>
    </style:style>
    <style:style style:name="T218" style:family="text">
      <style:text-properties officeooo:rsid="0196d09b"/>
    </style:style>
    <style:style style:name="T219" style:family="text">
      <style:text-properties officeooo:rsid="00dfde36"/>
    </style:style>
    <style:style style:name="T220" style:family="text">
      <style:text-properties officeooo:rsid="00fddc4b"/>
    </style:style>
    <style:style style:name="T221" style:family="text">
      <style:text-properties officeooo:rsid="0194ba93"/>
    </style:style>
    <style:style style:name="T222" style:family="text">
      <style:text-properties officeooo:rsid="015410fa"/>
    </style:style>
    <style:style style:name="T223" style:family="text">
      <style:text-properties officeooo:rsid="022fe24a"/>
    </style:style>
    <style:style style:name="T224" style:family="text">
      <style:text-properties officeooo:rsid="01ee5039"/>
    </style:style>
    <style:style style:name="T225" style:family="text">
      <style:text-properties fo:color="#ff0000" loext:opacity="100%" fo:font-style="italic" officeooo:rsid="02342bbd" style:font-style-asian="italic" style:font-style-complex="italic"/>
    </style:style>
    <style:style style:name="T226" style:family="text">
      <style:text-properties officeooo:rsid="01eec293"/>
    </style:style>
    <style:style style:name="T227" style:family="text">
      <style:text-properties officeooo:rsid="018917d6"/>
    </style:style>
    <style:style style:name="T228" style:family="text">
      <style:text-properties officeooo:rsid="016eb8a0"/>
    </style:style>
    <style:style style:name="T229" style:family="text">
      <style:text-properties officeooo:rsid="018dd2a6"/>
    </style:style>
    <style:style style:name="T230" style:family="text">
      <style:text-properties officeooo:rsid="0155d04d"/>
    </style:style>
    <style:style style:name="T231" style:family="text">
      <style:text-properties officeooo:rsid="00ff43e2"/>
    </style:style>
    <style:style style:name="T232" style:family="text">
      <style:text-properties officeooo:rsid="01611882"/>
    </style:style>
    <style:style style:name="T233" style:family="text">
      <style:text-properties officeooo:rsid="0162ca08"/>
    </style:style>
    <style:style style:name="T234" style:family="text">
      <style:text-properties fo:color="#127622" loext:opacity="100%" officeooo:rsid="01611882"/>
    </style:style>
    <style:style style:name="T235" style:family="text">
      <style:text-properties officeooo:rsid="0167447f"/>
    </style:style>
    <style:style style:name="T236" style:family="text">
      <style:text-properties fo:color="#ff0000" loext:opacity="100%" officeooo:rsid="0172046a"/>
    </style:style>
    <style:style style:name="T237" style:family="text">
      <style:text-properties officeooo:rsid="01575625"/>
    </style:style>
    <style:style style:name="T238" style:family="text">
      <style:text-properties fo:color="#127622" loext:opacity="100%" officeooo:rsid="01575625"/>
    </style:style>
    <style:style style:name="T239" style:family="text">
      <style:text-properties officeooo:rsid="017d0636"/>
    </style:style>
    <style:style style:name="T240" style:family="text">
      <style:text-properties officeooo:rsid="0175ccb2"/>
    </style:style>
    <style:style style:name="T241" style:family="text">
      <style:text-properties fo:font-style="italic" officeooo:rsid="0175ccb2" style:font-style-asian="italic" style:font-style-complex="italic"/>
    </style:style>
    <style:style style:name="T242" style:family="text">
      <style:text-properties fo:color="#127622" loext:opacity="100%" officeooo:rsid="0175ccb2"/>
    </style:style>
    <style:style style:name="T243" style:family="text">
      <style:text-properties fo:color="#127622" loext:opacity="100%" officeooo:rsid="01770ebe"/>
    </style:style>
    <style:style style:name="T244" style:family="text">
      <style:text-properties officeooo:rsid="01770ebe"/>
    </style:style>
    <style:style style:name="T245" style:family="text">
      <style:text-properties officeooo:rsid="01790c9a"/>
    </style:style>
    <style:style style:name="T246" style:family="text">
      <style:text-properties officeooo:rsid="017e279c"/>
    </style:style>
    <style:style style:name="T247" style:family="text">
      <style:text-properties fo:color="#127622" loext:opacity="100%" officeooo:rsid="017e279c"/>
    </style:style>
    <style:style style:name="T248" style:family="text">
      <style:text-properties officeooo:rsid="019d6dde"/>
    </style:style>
    <style:style style:name="T249" style:family="text">
      <style:text-properties officeooo:rsid="0172046a"/>
    </style:style>
    <style:style style:name="T250" style:family="text">
      <style:text-properties fo:color="#127622" loext:opacity="100%" officeooo:rsid="0172046a"/>
    </style:style>
    <style:style style:name="T251" style:family="text">
      <style:text-properties officeooo:rsid="01f56d1a"/>
    </style:style>
    <style:style style:name="T252" style:family="text">
      <style:text-properties officeooo:rsid="017b370b"/>
    </style:style>
    <style:style style:name="T253" style:family="text">
      <style:text-properties officeooo:rsid="01f6b9d2"/>
    </style:style>
    <style:style style:name="T254" style:family="text">
      <style:text-properties officeooo:rsid="0180df84"/>
    </style:style>
    <style:style style:name="T255" style:family="text">
      <style:text-properties fo:color="#ff0000" loext:opacity="100%" officeooo:rsid="0180e3be"/>
    </style:style>
    <style:style style:name="T256" style:family="text">
      <style:text-properties fo:color="#ff0000" loext:opacity="100%" officeooo:rsid="018295bb"/>
    </style:style>
    <style:style style:name="T257" style:family="text">
      <style:text-properties officeooo:rsid="0180eb68"/>
    </style:style>
    <style:style style:name="T258" style:family="text">
      <style:text-properties officeooo:rsid="018e8e34"/>
    </style:style>
    <style:style style:name="T259" style:family="text">
      <style:text-properties officeooo:rsid="01897684"/>
    </style:style>
    <style:style style:name="T260" style:family="text">
      <style:text-properties officeooo:rsid="018295bb"/>
    </style:style>
    <style:style style:name="T261" style:family="text">
      <style:text-properties officeooo:rsid="0181f3e6"/>
    </style:style>
    <style:style style:name="T262" style:family="text">
      <style:text-properties officeooo:rsid="0189d856"/>
    </style:style>
    <style:style style:name="T263" style:family="text">
      <style:text-properties fo:color="#127622" loext:opacity="100%" officeooo:rsid="018295bb"/>
    </style:style>
    <style:style style:name="T264" style:family="text">
      <style:text-properties officeooo:rsid="01931e5f"/>
    </style:style>
    <style:style style:name="T265" style:family="text">
      <style:text-properties officeooo:rsid="019dee4b"/>
    </style:style>
    <style:style style:name="T266" style:family="text">
      <style:text-properties fo:color="#127622" loext:opacity="100%" officeooo:rsid="019dee4b"/>
    </style:style>
    <style:style style:name="T267" style:family="text">
      <style:text-properties officeooo:rsid="02342bbd"/>
    </style:style>
    <style:style style:name="T268" style:family="text">
      <style:text-properties officeooo:rsid="02454ce6"/>
    </style:style>
    <style:style style:name="T269" style:family="text">
      <style:text-properties officeooo:rsid="02384f37"/>
    </style:style>
    <style:style style:name="T270" style:family="text">
      <style:text-properties officeooo:rsid="0235ca7f"/>
    </style:style>
    <style:style style:name="T271" style:family="text">
      <style:text-properties fo:color="#127622" loext:opacity="100%" officeooo:rsid="02342bbd"/>
    </style:style>
    <style:style style:name="T272" style:family="text">
      <style:text-properties officeooo:rsid="024bba71"/>
    </style:style>
    <style:style style:name="T273" style:family="text">
      <style:text-properties officeooo:rsid="023873d1"/>
    </style:style>
    <style:style style:name="T274" style:family="text">
      <style:text-properties officeooo:rsid="0239acac"/>
    </style:style>
    <style:style style:name="T275" style:family="text">
      <style:text-properties officeooo:rsid="023ab1c0"/>
    </style:style>
    <style:style style:name="T276" style:family="text">
      <style:text-properties fo:color="#ff0000" loext:opacity="100%" officeooo:rsid="024b01fb"/>
    </style:style>
    <style:style style:name="T277" style:family="text">
      <style:text-properties officeooo:rsid="024b01fb"/>
    </style:style>
    <style:style style:name="T278" style:family="text">
      <style:text-properties style:font-name-complex="Galaxie Unicode Hebrew"/>
    </style:style>
    <style:style style:name="T279" style:family="text">
      <style:text-properties officeooo:rsid="024a3793"/>
    </style:style>
    <style:style style:name="T280" style:family="text">
      <style:text-properties officeooo:rsid="0248c24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Bethsaid<text:span text:style-name="T1">a</text:span> to Bethsaida</text:p>
      <text:p text:style-name="P2"><text:span text:style-name="T2">T</text:span><text:span text:style-name="T3">he storms that blow us to where Jesus is needed most</text:span></text:p>
      <text:p text:style-name="Standard"/>
      <text:p text:style-name="P3"><text:span text:style-name="T4">Aside from the resurrection of Jesus the Christ, the “feeding of the 5000” miracle </text:span><text:span text:style-name="T5">is the only one </text:span><text:span text:style-name="T6">specifically </text:span><text:span text:style-name="T5">recorded </text:span><text:span text:style-name="T4">in all four gospels (</text:span><text:span text:style-name="T7">Matthew</text:span><text:span text:style-name="T4">, </text:span><text:span text:style-name="T7">Mark</text:span><text:span text:style-name="T4">, </text:span><text:span text:style-name="T7">Luke</text:span><text:span text:style-name="T4">, &amp; </text:span><text:span text:style-name="T7">John</text:span><text:span text:style-name="T4">).</text:span></text:p>
      <text:p text:style-name="Standard"/>
      <text:p text:style-name="P4">The “feeding of the 5000”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5">Matthew 14:13-21</text:p>
          </table:table-cell>
          <table:table-cell table:style-name="Table5.A1" office:value-type="string">
            <text:p text:style-name="P5">Mark 6:30-44</text:p>
          </table:table-cell>
          <table:table-cell table:style-name="Table5.A1" office:value-type="string">
            <text:p text:style-name="P6"><text:span text:style-name="T8">Luke 9:</text:span><text:span text:style-name="T9">10-</text:span><text:span text:style-name="T10">17</text:span></text:p>
          </table:table-cell>
          <table:table-cell table:style-name="Table5.D1" office:value-type="string">
            <text:p text:style-name="P7"><text:span text:style-name="T11">John 6:</text:span><text:span text:style-name="T12">1-</text:span><text:span text:style-name="T13">14</text:span></text:p>
          </table:table-cell>
        </table:table-row>
      </table:table>
      <text:p text:style-name="Standard"/>
      <text:p text:style-name="P8"><text:span text:style-name="T14">When </text:span><text:span text:style-name="T15">studying </text:span><text:span text:style-name="T14">these four records </text:span><text:span text:style-name="T16">together</text:span><text:span text:style-name="T14">, the events that happened just before, and the events that happened just after, we </text:span><text:span text:style-name="T17">discover a very</text:span><text:span text:style-name="T14"> interesting situation:</text:span></text:p>
      <text:p text:style-name="P8"/>
      <text:list text:style-name="L1">
        <text:list-item>
          <text:p text:style-name="P9"><text:span text:style-name="T17">The “feeding of the 5000” </text:span><text:span text:style-name="T18">took place</text:span><text:span text:style-name="T17"> </text:span><text:span text:style-name="T18">in a </text:span><text:span text:style-name="T19">grassy </text:span><text:span text:style-name="T18">plain belonging to</text:span><text:span text:style-name="T17"> </text:span><text:span text:style-name="T20">Bethsaida</text:span>.</text:p>
        </text:list-item>
        <text:list-item>
          <text:p text:style-name="P10"><text:span text:style-name="T18">A</text:span>fter the event, <text:span text:style-name="T21">Jesus </text:span><text:span text:style-name="T22">sent</text:span><text:span text:style-name="T21"> His disciples to the other side of the sea of Galilee to </text:span><text:span text:style-name="T23">Bethsaida</text:span><text:span text:style-name="T21">.</text:span></text:p>
        </text:list-item>
      </text:list>
      <text:p text:style-name="P11"/>
      <text:p text:style-name="P12"><text:span text:style-name="T24">If you don’t understand why that is very weird, </text:span><text:span text:style-name="T25">follow along </text:span><text:span text:style-name="T26">and </text:span><text:span text:style-name="T25">you will soon enough. </text:span><text:span text:style-name="T27">First</text:span><text:span text:style-name="T28">, we need </text:span><text:span text:style-name="T29">to establish some </text:span><text:span text:style-name="T27">scripturally derived </text:span><text:span text:style-name="T29">geographical constraints.</text:span></text:p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The location of the miracle</text:p>
          </table:table-cell>
          <table:table-cell table:style-name="Table6.B1" office:value-type="string">
            <text:p text:style-name="P15">Their destination afterwards</text:p>
          </table:table-cell>
        </table:table-row>
        <table:table-row>
          <table:table-cell table:style-name="Table6.A2" office:value-type="string">
            <text:p text:style-name="P16">Matthew 14:13</text:p>
            <text:p text:style-name="Table_20_Contents">When Jesus heard of it <text:span text:style-name="T30">[</text:span><text:span text:style-name="T31">the death of John the Baptist</text:span><text:span text:style-name="T30">]</text:span>, he departed thence by ship into <text:span text:style-name="T32">a desert place apart</text:span>: and when the people had heard thereof, they followed him on foot <text:span text:style-name="T32">out of the cities</text:span>.</text:p>
          </table:table-cell>
          <table:table-cell table:style-name="Table6.B2" office:value-type="string">
            <text:p text:style-name="P17">Matthew 14:22</text:p>
            <text:p text:style-name="P18">And straightway Jesus constrained his disciples to <text:span text:style-name="T32">get into a ship</text:span>, and to <text:span text:style-name="T32">go before him unto the other side</text:span>, while he sent the multitudes away.</text:p>
          </table:table-cell>
        </table:table-row>
        <table:table-row>
          <table:table-cell table:style-name="Table6.A2" office:value-type="string">
            <text:p text:style-name="P16">Mark 6:31-<text:span text:style-name="T33">33</text:span></text:p>
            <text:p text:style-name="Table_20_Contents"><text:span text:style-name="T34">31</text:span><text:span text:style-name="T33"> </text:span>A<text:span text:style-name="T35">nd he said unto them, </text:span><text:span text:style-name="T36">Come ye yourselves apart into </text:span><text:span text:style-name="T37">a desert place</text:span><text:span text:style-name="T36">, </text:span><text:span text:style-name="T38">and rest a while:</text:span> for there were many coming and going, and they had no leisure so much as to eat.</text:p>
            <text:p text:style-name="Table_20_Contents"><text:span text:style-name="T39">32</text:span> And they departed into <text:span text:style-name="T32">a desert place</text:span><text:span text:style-name="T35"> by ship</text:span> privately.</text:p>
            <text:p text:style-name="Table_20_Contents"><text:span text:style-name="T39">33</text:span> And the people saw them departing, and many knew him, and ran afoot thither <text:span text:style-name="T32">out of all cities</text:span>, and outwent them, and came together unto him.</text:p>
          </table:table-cell>
          <table:table-cell table:style-name="Table6.B2" office:value-type="string">
            <text:p text:style-name="P17">Mark 6:45</text:p>
            <text:p text:style-name="P19">And straightway he constrained his disciples to <text:span text:style-name="T32">get into the ship</text:span>, and to <text:span text:style-name="T32">go to the other side before unto Bethsaida</text:span>, while he sent away the people.</text:p>
          </table:table-cell>
        </table:table-row>
        <table:table-row>
          <table:table-cell table:style-name="Table6.A2" office:value-type="string">
            <text:p text:style-name="P16">Luke 9:10</text:p>
            <text:p text:style-name="Table_20_Contents">And the apostles, when they were returned, told him all that they had done<text:span text:style-name="T39"> </text:span><text:span text:style-name="T40">[on the missionary journey that Jesus sent them on]</text:span>. And he took them, and went aside privately into <text:span text:style-name="T32">a desert place belonging to the city called Bethsaida</text:span>.</text:p>
          </table:table-cell>
          <table:table-cell table:style-name="Table6.B2" office:value-type="string">
            <text:p text:style-name="P20">No record of the event</text:p>
          </table:table-cell>
        </table:table-row>
        <table:table-row table:style-name="Table6.5">
          <table:table-cell table:style-name="Table6.A2" office:value-type="string">
            <text:p text:style-name="P16">John 6:1</text:p>
            <text:p text:style-name="Table_20_Contents">After these things Jesus went <text:span text:style-name="T32">over the sea of Galilee</text:span>, which is the sea of Tiberias.</text:p>
            <text:p text:style-name="Table_20_Contents"/>
            <text:p text:style-name="P21"><text:span text:style-name="T41">(</text:span><text:span text:style-name="T42">coming </text:span><text:span text:style-name="T41">from “</text:span><text:span text:style-name="T42">his country” </text:span><text:span text:style-name="T43">Mat 13:54</text:span><text:span text:style-name="T42">, </text:span><text:span text:style-name="T43">Mar 6:1</text:span><text:span text:style-name="T41">)</text:span></text:p>
          </table:table-cell>
          <table:table-cell table:style-name="Table6.B2" office:value-type="string">
            <text:p text:style-name="Table_20_Contents"><text:span text:style-name="T44">John 6:15,16</text:span><text:span text:style-name="T41"> (what time they left; </text:span><text:span text:style-name="T45">~</text:span><text:span text:style-name="T46">6PM</text:span><text:span text:style-name="T41">)</text:span></text:p>
            <text:p text:style-name="Table_20_Contents"><text:span text:style-name="T39">15</text:span> When Jesus therefore perceived that they would come and take him by force, to make him a ki<text:span text:style-name="T35">ng, he departed again into a mountain himself alone.</text:span></text:p>
            <text:p text:style-name="Table_20_Contents"><text:span text:style-name="T39">16</text:span> And when <text:span text:style-name="T32">even</text:span> was now come, <text:span text:style-name="T32">his disciples went down unto the sea,</text:span></text:p>
          </table:table-cell>
        </table:table-row>
      </table:table>
      <text:p text:style-name="Standard"/>
      <text:p text:style-name="P22">Where did they come from before the “feeding of the 5000”?</text:p>
      <text:p text:style-name="P23">The text does not explicitly state that, after being in “<text:span text:style-name="T47">his own country</text:span>” (<text:span text:style-name="T44">Mat 13:54</text:span>) and going “<text:span text:style-name="T47">round about the villages, teaching</text:span>” (<text:span text:style-name="T44">Mark 6:6</text:span>), they reconvened in Capernaum before traveling “<text:span text:style-name="T47">over the sea of Galilee</text:span>” (<text:span text:style-name="T44">John 6:1</text:span>) into the land of Bethsaida. <text:span text:style-name="T48">R</text:span>egardless of their exact departure point, we <text:span text:style-name="T49">do </text:span>know <text:span text:style-name="T49">that </text:span>they were somewhere on the western side of the sea <text:span text:style-name="T50">(</text:span><text:span text:style-name="T51">John 6:1</text:span><text:span text:style-name="T50">, </text:span><text:span text:style-name="T51">Mark 6:45,53</text:span><text:span text:style-name="T50">).</text:span></text:p>
      <text:p text:style-name="P24"><text:soft-page-break/><text:span text:style-name="T52">A topographic map of the sea of Galilee circa 30AD</text:span></text:p>
      <text:p text:style-name="P25"/>
      <text:p text:style-name="P26"><draw:frame draw:style-name="fr1" draw:name="Frame2" text:anchor-type="as-char" svg:width="6.9835in" draw:z-index="2"><draw:text-box fo:min-height="8.8126in"><text:p text:style-name="P27"><draw:frame draw:style-name="fr2" draw:name="Image1" text:anchor-type="paragraph" svg:width="6.9835in" style:rel-width="100%" svg:height="8.8126in" style:rel-height="scale" draw:z-index="3"><draw:image xlink:href="Pictures/10000000000002E1000003A2B0E4E9F7.png" xlink:type="simple" xlink:show="embed" xlink:actuate="onLoad" draw:mime-type="image/png"/></draw:frame>Biblemapper 3.0</text:p></draw:text-box></draw:frame></text:p>
      <text:p text:style-name="Standard"/>
      <text:p text:style-name="P28">The “<text:span text:style-name="T47">desert place</text:span>” belonging to <text:span text:style-name="T53">the city called </text:span><text:span text:style-name="T54">Bethsaida</text:span> (<text:span text:style-name="T44">Luke 9:10</text:span>) that had much grass (<text:span text:style-name="T44">John 6:10</text:span>) where the “feeding of the 5000” <text:span text:style-name="T55">most likely </text:span>occurred <text:span text:style-name="T56">is</text:span> <text:span text:style-name="T57">a short </text:span><text:span text:style-name="T58">one to two mile </text:span><text:span text:style-name="T59">(&lt;1 hour) </text:span><text:span text:style-name="T58">walk </text:span><text:span text:style-name="T57">south of Bethsaida</text:span><text:span text:style-name="T55">. </text:span><text:span text:style-name="T60">Considering </text:span><text:span text:style-name="T61">all of </text:span><text:span text:style-name="T60">the scriptural</text:span><text:span text:style-name="T62">ly derived</text:span><text:span text:style-name="T60"> geographical constraints there are no other </text:span><text:span text:style-name="T63">viable </text:span><text:span text:style-name="T60">candidates.</text:span></text:p>
      <text:p text:style-name="P29"><text:soft-page-break/>Modern <text:span text:style-name="T64">pictures</text:span> of the plain south of Bethsaida of <text:span text:style-name="T65">Ituraea </text:span><text:span text:style-name="T66">(2015)</text:span></text:p>
      <text:p text:style-name="P30"/>
      <text:p text:style-name="P30"><draw:frame draw:style-name="fr3" draw:name="Image2" text:anchor-type="as-char" svg:width="6.0492in" svg:height="4.5366in" draw:z-index="0"><draw:image xlink:href="Pictures/100000000000032000000258B3214CAB.jpg" xlink:type="simple" xlink:show="embed" xlink:actuate="onLoad" draw:mime-type="image/jpeg"/></draw:frame></text:p>
      <text:p text:style-name="P31"/>
      <text:p text:style-name="P32">From north of Capernaum facing East we can see <text:span text:style-name="T67">in the distance </text:span>the fertile, alluvial plain of El-Batiha which is <text:span text:style-name="T68">the same “</text:span><text:span text:style-name="T69">desert place</text:span><text:span text:style-name="T68">” </text:span>south of Bethsaida.</text:p>
      <text:p text:style-name="Standard"/>
      <text:p text:style-name="P26"><draw:frame draw:style-name="fr3" draw:name="Image3" text:anchor-type="as-char" svg:width="6.1209in" svg:height="3.9634in" draw:z-index="1"><draw:image xlink:href="Pictures/1000000000000320000002062ABC1915.jpg" xlink:type="simple" xlink:show="embed" xlink:actuate="onLoad" draw:mime-type="image/jpeg"/></draw:frame></text:p>
      <text:p text:style-name="Standard"/>
      <text:p text:style-name="P33"><text:span text:style-name="T70">A</text:span>erial view <text:span text:style-name="T70">facing south </text:span>of the Bethsaida valley <text:span text:style-name="T71">(El-Batiha) </text:span>with the Jordan river roughly in the middle. <text:span text:style-name="T72">Bethsaida is </text:span><text:span text:style-name="T73">~</text:span><text:span text:style-name="T74">0.7 miles</text:span><text:span text:style-name="T72"> to the left/East of where this picture was taken.</text:span></text:p>
      <text:p text:style-name="P34"><text:soft-page-break/><text:span text:style-name="T55">So then, </text:span><text:span text:style-name="T75">after the “feeding of the 5000”, </text:span><text:span text:style-name="T55">w</text:span><text:span text:style-name="T76">hen Jesus sent </text:span><text:span text:style-name="T55">the disciples</text:span><text:span text:style-name="T76"> away before Him </text:span><text:span text:style-name="T77">to Bethsaida</text:span><text:span text:style-name="T76"> (</text:span><text:span text:style-name="T78">Matthew 14:22</text:span><text:span text:style-name="T79">, </text:span><text:span text:style-name="T80">Mark 6:45</text:span><text:span text:style-name="T76">), why were they told to get in</text:span><text:span text:style-name="T75">to</text:span><text:span text:style-name="T76"> </text:span><text:span text:style-name="T81">a ship</text:span><text:span text:style-name="T76">? </text:span><text:span text:style-name="T82">If they walked north it would take them </text:span><text:span text:style-name="T83">less than </text:span><text:span text:style-name="T84">one</text:span><text:span text:style-name="T83"> hour</text:span><text:span text:style-name="T82"> to reach </text:span><text:span text:style-name="T85">Bethsaid</text:span><text:span text:style-name="T65">a of Ituraea</text:span><text:span text:style-name="T85"> </text:span><text:span text:style-name="T86">(</text:span><text:span text:style-name="T87">Luke 3:1</text:span><text:span text:style-name="T86">)</text:span><text:span text:style-name="T85">.</text:span></text:p>
      <text:p text:style-name="P34"/>
      <text:p text:style-name="P34"><text:span text:style-name="T88">John 6:17</text:span><text:span text:style-name="T89"> tells us </text:span><text:span text:style-name="T90">that </text:span><text:span text:style-name="T89">their heading when they were on the sea </text:span><text:span text:style-name="T90">was “</text:span><text:span text:style-name="T91">toward Capernaum”. </text:span><text:span text:style-name="T92">W</text:span><text:span text:style-name="T93">hich, </text:span><text:span text:style-name="T94">no matter how we look at it is not a heading that </text:span><text:span text:style-name="T93">is along the coast</text:span><text:span text:style-name="T89">. </text:span><text:span text:style-name="T95">Now </text:span><text:span text:style-name="T90">that is </text:span><text:span text:style-name="T96">interesting</text:span><text:span text:style-name="T90">. </text:span><text:span text:style-name="T95">Why did </text:span><text:span text:style-name="T96">these disciples, </text:span><text:span text:style-name="T97">58% of which were fisherman</text:span><text:span text:style-name="T95"> </text:span><text:span text:style-name="T96">(</text:span><text:span text:style-name="T98">John 21:2,3</text:span><text:span text:style-name="T96">), </text:span><text:span text:style-name="T95">go </text:span><text:span text:style-name="T99">far</text:span><text:span text:style-name="T95"> out of their way to reach a destination that was </text:span><text:span text:style-name="T100">at most </text:span><text:span text:style-name="T101">three</text:span><text:span text:style-name="T102"> </text:span><text:span text:style-name="T95">miles north by foot? </text:span><text:span text:style-name="T103">T</text:span><text:span text:style-name="T97">o help you understand why I found this very odd </text:span><text:span text:style-name="T104">t</text:span><text:span text:style-name="T105">hat long-route might look </text:span><text:span text:style-name="T97">something like this</text:span><text:span text:style-name="T106">:</text:span></text:p>
      <text:p text:style-name="P35"/>
      <text:p text:style-name="P36"><draw:frame draw:style-name="fr3" draw:name="Image4" text:anchor-type="as-char" svg:width="6.4626in" svg:height="3.7445in" draw:z-index="9"><draw:image xlink:href="Pictures/10000000000002E1000001AB72A179ED.png" xlink:type="simple" xlink:show="embed" xlink:actuate="onLoad" draw:mime-type="image/png"/></draw:frame></text:p>
      <text:p text:style-name="P36"/>
      <text:p text:style-name="P37"><text:span text:style-name="T107">Now I’m </text:span><text:span text:style-name="T108">no </text:span><text:span text:style-name="T107">fisherman </text:span><text:span text:style-name="T108">nor an experienced sailor; </text:span><text:span text:style-name="T107">but, </text:span><text:span text:style-name="T109">that route </text:span><text:span text:style-name="T110">or anything like it </text:span><text:span text:style-name="T109">seems very </text:span><text:span text:style-name="T111">unusual</text:span><text:span text:style-name="T109">. </text:span><text:span text:style-name="T112">I don’t remember there being any wine at the “feeding of the 5000” and I also believe the disciples knew exactly where </text:span><text:span text:style-name="T113">to go </text:span><text:span text:style-name="T114">and how to get there. </text:span><text:span text:style-name="T115">At least four of them were intimately familiar with navigating these waters (</text:span><text:span text:style-name="T116">Mat 4:18-21</text:span><text:span text:style-name="T115">).</text:span></text:p>
      <text:p text:style-name="P37"/>
      <text:p text:style-name="P37"><text:span text:style-name="T117">Did Jesus send them </text:span><text:span text:style-name="T118">this</text:span><text:span text:style-name="T117"> long way to Bethsaida</text:span><text:span text:style-name="T85"> </text:span><text:span text:style-name="T117">so they </text:span><text:span text:style-name="T118">could toil against</text:span><text:span text:style-name="T117"> </text:span><text:span text:style-name="T119">north</text:span><text:span text:style-name="T120">west</text:span><text:span text:style-name="T119"> </text:span><text:span text:style-name="T117">wind </text:span><text:span text:style-name="T120">(</text:span><text:span text:style-name="T121">Mat 14:24</text:span><text:span text:style-name="T120">, </text:span><text:span text:style-name="T121">John 6:17</text:span><text:span text:style-name="T120">) </text:span><text:span text:style-name="T122">for over 9 hours </text:span><text:span text:style-name="T123">(</text:span><text:span text:style-name="T124">Mar</text:span><text:span text:style-name="T125">k</text:span><text:span text:style-name="T124"> 13:35</text:span><text:span text:style-name="T123">, </text:span><text:span text:style-name="T124">Joh</text:span><text:span text:style-name="T125">n</text:span><text:span text:style-name="T124"> 6:16,17</text:span><text:span text:style-name="T123">, </text:span><text:span text:style-name="T124">Mat 14:25</text:span><text:span text:style-name="T123">) </text:span><text:span text:style-name="T122">just</text:span><text:span text:style-name="T117"> </text:span><text:span text:style-name="T126">so that </text:span><text:span text:style-name="T117">He </text:span><text:span text:style-name="T127">and Peter </text:span><text:span text:style-name="T117">could </text:span><text:span text:style-name="T127">have a stroll </text:span><text:span text:style-name="T117">on </text:span><text:span text:style-name="T127">the </text:span><text:span text:style-name="T117">water? </text:span><text:span text:style-name="T128">Sounds odd, but I’ll admit it is a possibility (</text:span><text:span text:style-name="T129">Job 5:9</text:span><text:span text:style-name="T128">, </text:span><text:span text:style-name="T129">Rom 11:33</text:span><text:span text:style-name="T128">). </text:span><text:span text:style-name="T130">Let’s see what else we can find.</text:span></text:p>
      <text:p text:style-name="P38"/>
      <text:p text:style-name="P39">A quick search for “Bethsaida” reveals 7 matches in 7 verses. Here are two of them that are very interesting:</text:p>
      <text:p text:style-name="P38"/>
      <table:table table:name="Table3" table:style-name="Table3">
        <table:table-column table:style-name="Table3.A"/>
        <table:table-row>
          <table:table-cell table:style-name="Table3.A1" office:value-type="string">
            <text:p text:style-name="P40">John 1:43-44</text:p>
            <text:p text:style-name="P41"><text:span text:style-name="T39">43</text:span> The day following Jesus would go for<text:span text:style-name="T131">th into Galilee, and findeth Philip, a</text:span>nd saith unto him, <text:span text:style-name="T38">Follow me.</text:span></text:p>
            <text:p text:style-name="P41"><text:span text:style-name="T39">44</text:span> <text:span text:style-name="T131">Now </text:span><text:span text:style-name="T132">Philip</text:span><text:span text:style-name="T131"> was of </text:span><text:span text:style-name="T132">Bethsaida, the city of Andrew and Peter</text:span><text:span text:style-name="T131">.</text:span></text:p>
          </table:table-cell>
        </table:table-row>
      </table:table>
      <text:p text:style-name="P42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John 12:20-21</text:p>
            <text:p text:style-name="Table_20_Contents"><text:span text:style-name="T39">20</text:span> And there were<text:span text:style-name="T131"> certain Greeks </text:span>among them that came up to worship at the feast:</text:p>
            <text:p text:style-name="Table_20_Contents"><text:span text:style-name="T39">21</text:span> <text:span text:style-name="T131">The same </text:span>came therefo<text:span text:style-name="T131">re to </text:span><text:span text:style-name="T132">Philip, which was of Bethsaida of Galilee</text:span><text:span text:style-name="T131">, a</text:span>nd desired him, saying, Sir, we would see Jesus.</text:p>
          </table:table-cell>
        </table:table-row>
      </table:table>
      <text:p text:style-name="P43"/>
      <text:p text:style-name="P44">Wherever this Bethsaida of Galilee is: Philip, Andrew, and Peter were all from the same place.</text:p>
      <text:p text:style-name="P45"/>
      <text:p text:style-name="P45"><text:soft-page-break/><text:span text:style-name="T133">The following</text:span> <text:span text:style-name="T134">is a </text:span><text:span text:style-name="T135">map</text:span><text:span text:style-name="T134"> of </text:span><text:span text:style-name="T136">some of </text:span><text:span text:style-name="T134">the Roman provinces </text:span><text:span text:style-name="T137">around 30AD</text:span><text:span text:style-name="T134">. </text:span><text:span text:style-name="T138">N</text:span><text:span text:style-name="T139">otice</text:span><text:span text:style-name="T134"> anything interesting about Bethsaida?</text:span></text:p>
      <text:p text:style-name="P46"/>
      <text:p text:style-name="P47"><draw:frame draw:style-name="fr1" draw:name="Frame1" text:anchor-type="as-char" svg:width="3.4283in" draw:z-index="4"><draw:text-box fo:min-height="2.5193in"><text:p text:style-name="P48"><draw:frame draw:style-name="fr2" draw:name="Image5" text:anchor-type="paragraph" svg:width="3.2917in" style:rel-width="96%" svg:height="2.3063in" style:rel-height="scale" draw:z-index="5"><draw:image xlink:href="Pictures/100000010000044C0000030301807A32.png" xlink:type="simple" xlink:show="embed" xlink:actuate="onLoad" draw:mime-type="image/png"/></draw:frame><text:span text:style-name="T140">World History Encyclopedia<text:line-break/></text:span><text:a xlink:type="simple" xlink:href="https://creativecommons.org/licenses/by-nc/4.0/" text:style-name="Internet_20_link" text:visited-style-name="Visited_20_Internet_20_Link"><text:span text:style-name="T140">https://creativecommons.org/licenses/by-nc/4.0/</text:span></text:a></text:p></draw:text-box></draw:frame></text:p>
      <text:p text:style-name="P49"/>
      <text:p text:style-name="P50">It’s <text:span text:style-name="T141">not</text:span> in Galilee! <text:span text:style-name="T142">But wait, didn’t we just read that Bethsaida </text:span><text:span text:style-name="T143">is</text:span><text:span text:style-name="T142"> in Galilee? </text:span><text:span text:style-name="T144">Could it be, that just like Bethlehem</text:span><text:span text:style-name="T145"> </text:span><text:span text:style-name="T144">(</text:span><text:span text:style-name="T146">Jos 19:</text:span><text:span text:style-name="T147">10-</text:span><text:span text:style-name="T146">15</text:span><text:span text:style-name="T144">), there is more than one place called Bethsaida? </text:span><text:span text:style-name="T148">And i</text:span><text:span text:style-name="T144">f so, </text:span><text:span text:style-name="T149">where </text:span><text:span text:style-name="T150">is</text:span><text:span text:style-name="T149"> the Bethsaida in Galilee? </text:span><text:span text:style-name="T151">Let’s</text:span><text:span text:style-name="T152"> follow </text:span><text:span text:style-name="T153">Jesus</text:span><text:span text:style-name="T154"> and </text:span><text:span text:style-name="T153">the disciples</text:span><text:span text:style-name="T154"> </text:span><text:span text:style-name="T155">after the “feeding of the 5000” </text:span><text:span text:style-name="T151">and see if that tells us</text:span><text:span text:style-name="T154">:</text:span></text:p>
      <text:p text:style-name="P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span text:style-name="T44">Matthew 14:34</text:span><text:span text:style-name="T41"> (where Jesus took them)</text:span></text:p>
            <text:p text:style-name="Table_20_Contents">And when they were gone over, they came <text:span text:style-name="T32">into the land of Gennesaret</text:span>.</text:p>
          </table:table-cell>
          <table:table-cell table:style-name="Table2.B1" table:number-rows-spanned="2" office:value-type="string">
            <text:p text:style-name="Table_20_Contents"><text:span text:style-name="T44">John 6:15-17</text:span><text:span text:style-name="T41"> (the beginning of the disciples journey across the sea)</text:span></text:p>
            <text:p text:style-name="Table_20_Contents"><text:span text:style-name="T39">15</text:span> When Jesus therefore perceived that they would come and take him by force, to make him a king, he departed again into a mountain himself alone.</text:p>
            <text:p text:style-name="Table_20_Contents"><text:span text:style-name="T39">16</text:span> And when even was now come, <text:span text:style-name="T32">his disciples went</text:span> down unto the sea,</text:p>
            <text:p text:style-name="Table_20_Contents"><text:span text:style-name="T39">17</text:span> And entered into a ship, and went <text:span text:style-name="T32">over the sea toward Capernaum</text:span>. And it was now dark, and Jesus was not come to them.</text:p>
            <text:p text:style-name="Table_20_Contents"/>
            <text:p text:style-name="Table_20_Contents"><text:span text:style-name="T44">John 6:24-25</text:span><text:span text:style-name="T41"> (during and after arriving at “the land of Gennesaret”)</text:span></text:p>
            <text:p text:style-name="Table_20_Contents"><text:span text:style-name="T39">24</text:span> When the people therefore saw that Jesus was not there, neither his disciples, they also took shipping, and came to <text:span text:style-name="T32">Capernaum</text:span>, seeking for Jesus.</text:p>
            <text:p text:style-name="Table_20_Contents"><text:span text:style-name="T39">25</text:span> And when <text:span text:style-name="T32">they</text:span> had <text:span text:style-name="T32">found him</text:span> on the other side of the sea, they said unto him, Rabbi, when camest thou hither?</text:p>
          </table:table-cell>
        </table:table-row>
        <table:table-row>
          <table:table-cell table:style-name="Table2.A2" office:value-type="string">
            <text:p text:style-name="P52"><text:span text:style-name="T44">Mark 6:53</text:span><text:span text:style-name="T41"> (where Jesus took them)</text:span></text:p>
            <text:p text:style-name="P53">And when they had passed over, they came <text:span text:style-name="T32">into the land of Gennesaret</text:span>, and drew to the shore.</text:p>
          </table:table-cell>
          <table:covered-table-cell table:style-name="Table2.B1"/>
        </table:table-row>
      </table:table>
      <text:p text:style-name="P54"/>
      <text:p text:style-name="P54"><text:span text:style-name="T156">When the disciples left, they headed “</text:span><text:span text:style-name="T157">over the sea toward Capernaum</text:span><text:span text:style-name="T156">”. From the </text:span><text:span text:style-name="T157">evening</text:span><text:span text:style-name="T156"> (</text:span><text:span text:style-name="T158">John 6:16</text:span><text:span text:style-name="T156">) until into </text:span><text:span text:style-name="T157">the fourth watch of the night</text:span><text:span text:style-name="T156"> (</text:span><text:span text:style-name="T158">Mat 14:25</text:span><text:span text:style-name="T156">; ~9hrs) they </text:span><text:span text:style-name="T157">toiled</text:span><text:span text:style-name="T156"> against the </text:span><text:span text:style-name="T159">contrary </text:span><text:span text:style-name="T156">northwest wind (</text:span><text:span text:style-name="T158">Mat 14:24</text:span><text:span text:style-name="T156">). </text:span><text:span text:style-name="T160">For all that </text:span><text:span text:style-name="T161">rowing</text:span><text:span text:style-name="T160"> they traveled </text:span><text:span text:style-name="T156">f</text:span><text:span text:style-name="T160">a</text:span><text:span text:style-name="T156">r </text:span><text:span text:style-name="T160">enough to reach “</text:span><text:span text:style-name="T162">the other side</text:span><text:span text:style-name="T160">” but instead of arriving at their destination they ended up in the </text:span><text:span text:style-name="T156">middle of the sea </text:span><text:span text:style-name="T163">(</text:span><text:span text:style-name="T164">Mat 14:24</text:span><text:span text:style-name="T160">, </text:span><text:span text:style-name="T164">Mar 6:47</text:span>, <text:span text:style-name="T165">John 6:19</text:span><text:span text:style-name="T156">).</text:span></text:p>
      <text:p text:style-name="P54"/>
      <text:p text:style-name="P55"><draw:frame draw:style-name="fr3" draw:name="Image7" text:anchor-type="as-char" svg:width="4.7547in" svg:height="2.7543in" draw:z-index="10"><draw:image xlink:href="Pictures/10000000000002E1000001AB3DC12E9C.png" xlink:type="simple" xlink:show="embed" xlink:actuate="onLoad" draw:mime-type="image/png"/></draw:frame></text:p>
      <text:p text:style-name="P56"><text:soft-page-break/><text:span text:style-name="T166">This time, instead of </text:span><text:span text:style-name="T167">Jesus </text:span><text:span text:style-name="T166">rebuking the </text:span><text:span text:style-name="T168">boisterous</text:span><text:span text:style-name="T166"> wind </text:span><text:span text:style-name="T169">(</text:span><text:span text:style-name="T170">Mar 4:39</text:span><text:span text:style-name="T169">)</text:span><text:span text:style-name="T166">, the wind did not cease (</text:span><text:span text:style-name="T171">Mat 14:32</text:span><text:span text:style-name="T166">) until they </text:span><text:span text:style-name="T168">willingly</text:span><text:span text:style-name="T166"> received Jesus </text:span><text:span text:style-name="T172">(and Peter with Him) </text:span><text:span text:style-name="T166">into their ship (</text:span><text:span text:style-name="T173">Mat 14:32</text:span><text:span text:style-name="T172">, </text:span><text:span text:style-name="T171">John 6:21</text:span><text:span text:style-name="T166">). </text:span><text:span text:style-name="T174">And when they did, </text:span><text:span text:style-name="T175">immediately</text:span><text:span text:style-name="T174"> (</text:span><text:span text:style-name="T176">John 6:21</text:span><text:span text:style-name="T174">) the ship </text:span><text:span text:style-name="T177">arrived at “the paradise of Galilee” (the land of Gennesaret) as it was so called by the historian Flavius Josephus due to it’s </text:span><text:span text:style-name="T178">very</text:span><text:span text:style-name="T177"> fertile, well-watered land </text:span><text:span text:style-name="T179">which produces an</text:span><text:span text:style-name="T177"> abundance of agricultur</text:span><text:span text:style-name="T179">al products in a </text:span><text:span text:style-name="T180">relatively </text:span><text:span text:style-name="T179">small area.</text:span></text:p>
      <text:p text:style-name="P57"/>
      <text:p text:style-name="P58"><draw:frame draw:style-name="fr3" draw:name="Image6" text:anchor-type="as-char" svg:width="5.3602in" svg:height="4.5972in" draw:z-index="6"><draw:image xlink:href="Pictures/10000000000002DB00000273A320040A.png" xlink:type="simple" xlink:show="embed" xlink:actuate="onLoad" draw:mime-type="image/png"/></draw:frame></text:p>
      <text:p text:style-name="Standard"/>
      <text:p text:style-name="P59"><text:span text:style-name="T181">While</text:span><text:span text:style-name="T182"> in the land of Gennesaret </text:span><text:span text:style-name="T181">word spread quickly that Jesus was there </text:span><text:span text:style-name="T183">and they brought the sick and the diseased to be healed </text:span><text:span text:style-name="T184">as </text:span><text:span text:style-name="T185">Jesus and the disciples</text:span><text:span text:style-name="T184"> traveled toward Capernaum </text:span><text:span text:style-name="T181">(</text:span><text:span text:style-name="T186">Mat 14:</text:span><text:span text:style-name="T187">34-</text:span><text:span text:style-name="T186">36</text:span><text:span text:style-name="T181">, </text:span><text:span text:style-name="T186">Mark 6:5</text:span><text:span text:style-name="T187">3-56</text:span>, <text:span text:style-name="T188">John 6:24,25</text:span><text:span text:style-name="T181">).</text:span></text:p>
      <text:p text:style-name="P60"/>
      <text:p text:style-name="P61"><text:span text:style-name="T189">T</text:span>he people from the “feeding of the 5000” took note that the disciples had left without Jesus, and joined by more boats from Tiberias, they went <text:span text:style-name="T190">to Capernaum to </text:span>search <text:span text:style-name="T190">for </text:span>Jesus <text:span text:style-name="T191">(</text:span><text:span text:style-name="T192">John 6:22-24</text:span><text:span text:style-name="T191">)</text:span>. And by the time<text:span text:style-name="T193"> </text:span>they arrived, that is where they found <text:span text:style-name="T194">Him </text:span><text:span text:style-name="T191">(</text:span><text:span text:style-name="T192">John 6:25</text:span><text:span text:style-name="T191">)</text:span><text:span text:style-name="T194">.</text:span></text:p>
      <text:p text:style-name="P60"/>
      <text:p text:style-name="P60"/>
      <text:p text:style-name="P62">Summary</text:p>
      <text:p text:style-name="Standard"/>
      <text:list text:style-name="L2">
        <text:list-item>
          <text:p text:style-name="P63"><text:span text:style-name="T195">A</text:span><text:span text:style-name="T196">fter the “feeding of the 5000”, Jesus </text:span><text:span text:style-name="T197">constrained</text:span><text:span text:style-name="T196"> the disciples to go on </text:span><text:span text:style-name="T198">without</text:span><text:span text:style-name="T196"> Him to Bethsaida.</text:span></text:p>
        </text:list-item>
        <text:list-item>
          <text:p text:style-name="P64">When the disciples left at evening they headed towards Capernaum.</text:p>
        </text:list-item>
        <text:list-item>
          <text:p text:style-name="P65">Between 3AM and 6AM the next morning, Jesus meets them in the midst of the sea of Galilee and immediately they arrive at the land of Gennesaret.</text:p>
        </text:list-item>
        <text:list-item>
          <text:p text:style-name="P66">In the land of Gennesaret, and while headed towards Capernaum, Jesus healed many sick and diseased people from the region round about.</text:p>
        </text:list-item>
      </text:list>
      <text:p text:style-name="P67"/>
      <text:p text:style-name="P68">So, where’s Bethsaida of Galilee in all of that? <text:span text:style-name="T199">Did Jesus send them to some mysterious location that they never actually visited?</text:span></text:p>
      <text:p text:style-name="P68"/>
      <text:p text:style-name="P69"><text:span text:style-name="T200">I</text:span><text:span text:style-name="T201">n </text:span><text:span text:style-name="T202">John 12:21</text:span> what <text:span text:style-name="T203">is </text:span>the hometown of Philip, Andrew, and Peter <text:span text:style-name="T200">called</text:span><text:span text:style-name="T201">? </text:span><text:span text:style-name="T204">Bethsaida </text:span><text:span text:style-name="T205">of Galilee</text:span><text:span text:style-name="T204">.</text:span></text:p>
      <text:p text:style-name="P70"/>
      <text:p text:style-name="P71"><text:soft-page-break/><text:span text:style-name="T206">In the following verses w</text:span><text:span text:style-name="T207">hat is the hometown of Philip, </text:span><text:span text:style-name="T208">Andrew, and </text:span><text:span text:style-name="T207">Peter called?</text:span></text:p>
      <text:p text:style-name="P7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Matthew 4:12,<text:span text:style-name="T209">13,17-</text:span>19</text:p>
            <text:p text:style-name="Table_20_Contents"><text:span text:style-name="T39">12</text:span> Now when Jesus had heard that John was cast into prison, <text:span text:style-name="T35">he departed into </text:span><text:span text:style-name="T32">Galilee</text:span><text:span text:style-name="T35">;</text:span></text:p>
            <text:p text:style-name="Table_20_Contents"><text:span text:style-name="T39">13</text:span> And leaving Nazareth, he came and <text:span text:style-name="T32">dwelt in Capernaum</text:span>, which is upon the sea coast, in the borders of Zabulon and Nephthalim:</text:p>
            <text:p text:style-name="Table_20_Contents">...</text:p>
            <text:p text:style-name="Table_20_Contents"><text:span text:style-name="T39">17</text:span> From that time Jesus began to preach, and to say, <text:span text:style-name="T38">Repent: for the kingdom of heaven is at hand.</text:span></text:p>
            <text:p text:style-name="Table_20_Contents"><text:span text:style-name="T39">18</text:span> And Jesus, walking by the sea of Galilee, saw two brethren, <text:span text:style-name="T32">Simon called Peter</text:span>, and <text:span text:style-name="T32">Andrew</text:span> his brother, casting a net into the sea: for they were fishers.</text:p>
            <text:p text:style-name="Table_20_Contents"><text:span text:style-name="T39">19</text:span> And he saith unto them, <text:span text:style-name="T38">Follow me, and I will make you fishers of men.</text:span></text:p>
          </table:table-cell>
          <table:table-cell table:style-name="Table4.A1" office:value-type="string">
            <text:p text:style-name="P16">Mark 1:14-17</text:p>
            <text:p text:style-name="Table_20_Contents"><text:span text:style-name="T39">14</text:span> Now after that John was put in prison<text:span text:style-name="T35">, Jesus came into </text:span><text:span text:style-name="T32">Galilee</text:span><text:span text:style-name="T35">,</text:span> preaching the gospel of the kingdom of God,</text:p>
            <text:p text:style-name="Table_20_Contents"><text:span text:style-name="T39">15</text:span> And saying, <text:span text:style-name="T38">The time is fulfilled, and the kingdom of God is at hand: repent ye, and believe the gospel.</text:span></text:p>
            <text:p text:style-name="Table_20_Contents"><text:span text:style-name="T39">16</text:span> Now as he walked by the sea of Galilee, he saw <text:span text:style-name="T32">Simon</text:span> and <text:span text:style-name="T32">Andrew</text:span> his brother casting a net into the sea: for they were fishers.</text:p>
            <text:p text:style-name="Table_20_Contents"><text:span text:style-name="T39">17</text:span> And Jesus said unto them, <text:span text:style-name="T38">Come ye after me, and I will make you to become fishers of men.</text:span></text:p>
            <text:p text:style-name="Table_20_Contents"/>
            <text:p text:style-name="P16">Mark 1:21, <text:span text:style-name="T210">29-30</text:span></text:p>
            <text:p text:style-name="Table_20_Contents"><text:span text:style-name="T211">21</text:span><text:span text:style-name="T210"> </text:span>And they went into <text:span text:style-name="T32">Capernaum</text:span>; and<text:span text:style-name="T35"> straightway on the sabbath day he entered into the synagogue,</text:span> and taught.</text:p>
            <text:p text:style-name="Table_20_Contents"><text:span text:style-name="T39">29</text:span> And forthwith, <text:span text:style-name="T32">when they were come out of the synagogue, they entered into the house of Simon and Andrew</text:span>, with James and John.</text:p>
            <text:p text:style-name="Table_20_Contents"><text:span text:style-name="T39">30</text:span> But Simon's wife's mother lay sick of a fever, and anon they tell him of her.</text:p>
          </table:table-cell>
          <table:table-cell table:style-name="Table4.C1" office:value-type="string">
            <text:p text:style-name="P16">Luke 4:31-<text:span text:style-name="T212">33,</text:span>38</text:p>
            <text:p text:style-name="Table_20_Contents"><text:span text:style-name="T39">31</text:span> And came down to <text:span text:style-name="T32">Capernaum, a city of Galilee</text:span>, and taught them on the sabbath days.</text:p>
            <text:p text:style-name="Table_20_Contents"><text:span text:style-name="T39">32</text:span> And they were astonished at his doctrine: for his word was with power.</text:p>
            <text:p text:style-name="Table_20_Contents"><text:span text:style-name="T39">33</text:span> And<text:span text:style-name="T35"> in the synagogue </text:span>there was a man, which had a spirit of an unclean devil, and cried out with a loud voice,</text:p>
            <text:p text:style-name="Table_20_Contents">...</text:p>
            <text:p text:style-name="Table_20_Contents"><text:span text:style-name="T39">38</text:span> And he arose <text:span text:style-name="T32">out of the synagogue, and entered into Simon's house</text:span>. And Simon's wife's mother was taken with a great fever; and they besought him for her.</text:p>
          </table:table-cell>
        </table:table-row>
      </table:table>
      <text:p text:style-name="P50"/>
      <text:p text:style-name="P72">When <text:span text:style-name="T213">they</text:span> left <text:span text:style-name="T214">the synagogue</text:span><text:span text:style-name="T215">*</text:span><text:span text:style-name="T216">*</text:span> in <text:span text:style-name="T141">Capernaum</text:span> <text:span text:style-name="T213">their</text:span> next stop was <text:span text:style-name="T217">necessarily </text:span>a house in the same town <text:span text:style-name="T218">because of s</text:span><text:span text:style-name="T217">abbath </text:span><text:span text:style-name="T218">day </text:span><text:span text:style-name="T217">walking restrictions. </text:span><text:span text:style-name="T219">So, either </text:span><text:span text:style-name="T220">Philip, Andrew, and Simon</text:span><text:span text:style-name="T219"> </text:span><text:span text:style-name="T220">were originally from Bethsaida of Galilee</text:span><text:span text:style-name="T221"> </text:span><text:span text:style-name="T220">and then they all decided to move to Capernaum … or</text:span><text:span text:style-name="T219"> </text:span><text:span text:style-name="T222">both </text:span><text:span text:style-name="T219">Capernaum </text:span><text:span text:style-name="T220">and</text:span><text:span text:style-name="T219"> Bethsaida of Galilee </text:span><text:span text:style-name="T220">are two different names for the same</text:span><text:span text:style-name="T223"> </text:span><text:span text:style-name="T224">location</text:span><text:span text:style-name="T225">***</text:span><text:span text:style-name="T224">. </text:span><text:span text:style-name="T226">I submit to you that the latter is the case.</text:span></text:p>
      <text:p text:style-name="P7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4">English</text:p>
          </table:table-cell>
          <table:table-cell table:style-name="Table7.A1" office:value-type="string">
            <text:p text:style-name="P75">1524 Bomberg MT</text:p>
          </table:table-cell>
          <table:table-cell table:style-name="Table7.C1" office:value-type="string">
            <text:p text:style-name="P74">Meaning</text:p>
          </table:table-cell>
        </table:table-row>
        <table:table-row>
          <table:table-cell table:style-name="Table7.A2" office:value-type="string">
            <text:p text:style-name="P76">Beth-</text:p>
          </table:table-cell>
          <table:table-cell table:style-name="Table7.A2" office:value-type="string">
            <text:p text:style-name="P77">בֵּית</text:p>
          </table:table-cell>
          <table:table-cell table:style-name="Table7.C2" office:value-type="string">
            <text:p text:style-name="P76">“House” or “place”</text:p>
          </table:table-cell>
        </table:table-row>
        <table:table-row>
          <table:table-cell table:style-name="Table7.A2" office:value-type="string">
            <text:p text:style-name="P76">-<text:span text:style-name="T227">s</text:span>aida</text:p>
          </table:table-cell>
          <table:table-cell table:style-name="Table7.A2" office:value-type="string">
            <text:p text:style-name="P77">צַיְדָה</text:p>
          </table:table-cell>
          <table:table-cell table:style-name="Table7.C2" office:value-type="string">
            <text:p text:style-name="P78">“<text:span text:style-name="T228">fishing”, “hunting”, or “providing food”</text:span></text:p>
          </table:table-cell>
        </table:table-row>
        <table:table-row>
          <table:table-cell table:style-name="Table7.A2" office:value-type="string">
            <text:p text:style-name="P76">-<text:span text:style-name="T227">l</text:span>ehem</text:p>
          </table:table-cell>
          <table:table-cell table:style-name="Table7.A2" office:value-type="string">
            <text:p text:style-name="P79">לֶחֶם</text:p>
          </table:table-cell>
          <table:table-cell table:style-name="Table7.C2" office:value-type="string">
            <text:p text:style-name="P78">“<text:span text:style-name="T229">b</text:span><text:span text:style-name="T228">read”, “feeding”, “consuming”</text:span></text:p>
          </table:table-cell>
        </table:table-row>
      </table:table>
      <text:p text:style-name="P80"/>
      <text:p text:style-name="P81"><text:span text:style-name="T230">“Beth-saida” is</text:span><text:span text:style-name="T220"> </text:span><text:span text:style-name="T231">a </text:span><text:span text:style-name="T220">very</text:span> fitting <text:span text:style-name="T231">name for the place that </text:span><text:span text:style-name="T232">the </text:span><text:span text:style-name="T233">B</text:span><text:span text:style-name="T232">read of life (</text:span><text:span text:style-name="T234">John 6:48</text:span><text:span text:style-name="T232">), </text:span><text:span text:style-name="T233">born in the “house of bread” (Beth-lehem), </text:span><text:span text:style-name="T231">chose to </text:span><text:span text:style-name="T235">first cast His net</text:span><text:span text:style-name="T236">* </text:span><text:span text:style-name="T237">(</text:span><text:span text:style-name="T238">Mat 4:18-21</text:span><text:span text:style-name="T237">)</text:span><text:span text:style-name="T235">.</text:span></text:p>
      <text:p text:style-name="P82"/>
      <text:p text:style-name="Standard"><text:span text:style-name="T236">*</text:span> <text:span text:style-name="T239">Andrew</text:span><text:span text:style-name="T240"> and an unnamed disciple are the first recorded to </text:span><text:span text:style-name="T241">voluntarily</text:span><text:span text:style-name="T240"> follow Jesus (</text:span><text:span text:style-name="T242">John 1:35-40</text:span><text:span text:style-name="T240">). Simon then meets Jesus (</text:span><text:span text:style-name="T243">John 1:42</text:span><text:span text:style-name="T244">) </text:span><text:span text:style-name="T240">but is not explicitly called </text:span><text:span text:style-name="T245">(</text:span><text:span text:style-name="T240">commanded to follow</text:span><text:span text:style-name="T245">) </text:span><text:span text:style-name="T246">until after John the Baptist is put into prison (</text:span><text:span text:style-name="T247">Mark 1:14</text:span><text:span text:style-name="T246">)</text:span><text:span text:style-name="T240">. Therefore, Philip </text:span><text:span text:style-name="T248">was</text:span><text:span text:style-name="T240"> the first disciple to be called </text:span><text:span text:style-name="T249">(</text:span><text:span text:style-name="T250">John 1:43</text:span><text:span text:style-name="T249">). </text:span><text:span text:style-name="T251">W</text:span><text:span text:style-name="T244">e don’t </text:span><text:span text:style-name="T252">know </text:span><text:span text:style-name="T253">precisely where that occurred</text:span><text:span text:style-name="T244">. </text:span><text:span text:style-name="T254">We o</text:span><text:span text:style-name="T244">nly </text:span><text:span text:style-name="T254">know </text:span><text:span text:style-name="T244">that it was </text:span><text:span text:style-name="T254">somewhere </text:span><text:span text:style-name="T244">in Galilee (</text:span><text:span text:style-name="T243">John 1:43</text:span><text:span text:style-name="T244">).</text:span></text:p>
      <text:p text:style-name="Standard"/>
      <text:p text:style-name="P83"><text:span text:style-name="T255">*</text:span><text:span text:style-name="T256">*</text:span> <text:span text:style-name="T257">Sabbath walking restrictions means that everyone present lived/</text:span><text:span text:style-name="T258">temporarily </text:span><text:span text:style-name="T259">resided</text:span><text:span text:style-name="T257"> with</text:span><text:span text:style-name="T260">in</text:span><text:span text:style-name="T257"> ~0.6 miles </text:span><text:span text:style-name="T261">(~3300ft.) </text:span><text:span text:style-name="T257">of that synagogue: </text:span><text:span text:style-name="T261">Jesus, Andrew, Simon, James, and John. </text:span><text:span text:style-name="T260">And since Philip was called to follow </text:span><text:span text:style-name="T262">Jesus </text:span><text:span text:style-name="T260">before the events of </text:span><text:span text:style-name="T263">Mark 1:17</text:span><text:span text:style-name="T260">, </text:span><text:span text:style-name="T262">and we are never told that </text:span><text:span text:style-name="T264">he went </text:span><text:span text:style-name="T262">anywhere else: </text:span><text:span text:style-name="T260">he was also very likely present </text:span><text:span text:style-name="T265">in </text:span><text:span text:style-name="T266">Mark 1:29</text:span><text:span text:style-name="T265">.</text:span></text:p>
      <text:p text:style-name="P83"/>
      <text:p text:style-name="P84"><text:soft-page-break/><text:span text:style-name="T225">*** </text:span><text:span text:style-name="T267">The </text:span><text:span text:style-name="T268">center of the </text:span><text:span text:style-name="T267">city </text:span><text:span text:style-name="T269">of </text:span><text:span text:style-name="T267">Capernaum is ~ 1/10th of a mile </text:span><text:span text:style-name="T270">(~528ft.) </text:span><text:span text:style-name="T267">away from the shore. This makes a lot of sense when you think about both the logistics of the fishing industry like that of Zebedee (</text:span><text:span text:style-name="T271">Mark 1:20</text:span><text:span text:style-name="T267">) and the fact that the processing of those products would be undesirable in </text:span><text:span text:style-name="T272">the city proper</text:span><text:span text:style-name="T267">. </text:span><text:span text:style-name="T273">You definitely want that place down wind. </text:span><text:span text:style-name="T274">Thus, we have two names for the same general place: Capernaum for the city proper and the “house of fishing” </text:span><text:span text:style-name="T275">(Beth-saida) </text:span><text:span text:style-name="T274">on the shore.</text:span></text:p>
      <text:p text:style-name="P85"/>
      <text:p text:style-name="P86"><draw:frame draw:style-name="fr3" draw:name="Image8" text:anchor-type="as-char" svg:width="2.1098in" svg:height="1.9909in" draw:z-index="7"><draw:image xlink:href="Pictures/100000010000014300000115175A75D3.png" xlink:type="simple" xlink:show="embed" xlink:actuate="onLoad" draw:mime-type="image/png"/></draw:frame></text:p>
      <text:p text:style-name="Standard"/>
      <text:p text:style-name="P87">Modern day view of Capernaum</text:p>
      <text:p text:style-name="P88"/>
      <text:p text:style-name="P26"><draw:frame draw:style-name="fr4" draw:name="Image9" text:anchor-type="as-char" svg:width="4.6736in" svg:height="4.5591in" draw:z-index="8"><draw:image xlink:href="Pictures/10000001000003D3000003BB9B4EBCCF.png" xlink:type="simple" xlink:show="embed" xlink:actuate="onLoad" draw:mime-type="image/png"/></draw:frame></text:p>
      <text:p text:style-name="Standard"/>
      <text:p text:style-name="Standard"/>
      <text:p text:style-name="P89">“<text:span text:style-name="T276">Be of good cheer; it is I; be not afraid</text:span><text:span text:style-name="T277">”</text:span></text:p>
      <text:p text:style-name="P90">(<text:span text:style-name="T44">Mat 14:27</text:span>, <text:span text:style-name="T44">Mark 6:50</text:span>, <text:span text:style-name="T44">John 6:20</text:span>)</text:p>
      <text:p text:style-name="P8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1">English</text:p>
          </table:table-cell>
          <table:table-cell table:style-name="Table8.A1" office:value-type="string">
            <text:p text:style-name="P91">Transliteration</text:p>
          </table:table-cell>
          <table:table-cell table:style-name="Table8.C1" office:value-type="string">
            <text:p text:style-name="P91">Meaning</text:p>
          </table:table-cell>
        </table:table-row>
        <table:table-row>
          <table:table-cell table:style-name="Table8.A2" office:value-type="string">
            <text:p text:style-name="P92">Caper</text:p>
          </table:table-cell>
          <table:table-cell table:style-name="Table8.A2" office:value-type="string">
            <text:p text:style-name="P93"><text:span text:style-name="T278">כְּפַר</text:span> Kephar <text:span text:style-name="T279">(village)</text:span></text:p>
          </table:table-cell>
          <table:table-cell table:style-name="Table8.C2" office:value-type="string">
            <text:p text:style-name="P93">“<text:span text:style-name="T280">to cover”, “to shelter”</text:span></text:p>
          </table:table-cell>
        </table:table-row>
        <table:table-row>
          <table:table-cell table:style-name="Table8.A2" office:value-type="string">
            <text:p text:style-name="P92">-naum</text:p>
          </table:table-cell>
          <table:table-cell table:style-name="Table8.A2" office:value-type="string">
            <text:p text:style-name="P93"><text:span text:style-name="T278">נַחוּם</text:span> Nachum <text:span text:style-name="T280">(</text:span><text:span text:style-name="T279">of </text:span><text:span text:style-name="T280">Nahum)</text:span></text:p>
          </table:table-cell>
          <table:table-cell table:style-name="Table8.C2" office:value-type="string">
            <text:p text:style-name="P93">“<text:span text:style-name="T280">comfort”, “consolation”, or “compassion”</text:span>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" svg:font-family="Gabriela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4T11:21:22.866121530</meta:creation-date>
    <dc:title>default</dc:title>
    <meta:editing-duration>P1DT4H59M54S</meta:editing-duration>
    <meta:editing-cycles>764</meta:editing-cycles>
    <meta:generator>LibreOffice/26.2.4.2$Linux_X86_64 LibreOffice_project/64a984c51f4702dbd3710b13428c673a2f1292e7</meta:generator>
    <dc:date>2026-07-11T12:30:49.087112469</dc:date>
    <meta:document-statistic meta:table-count="8" meta:image-count="9" meta:object-count="0" meta:page-count="8" meta:paragraph-count="139" meta:word-count="2380" meta:character-count="13296" meta:non-whitespace-character-count="11052"/>
    <meta:template xlink:type="simple" xlink:actuate="onRequest" xlink:title="default" xlink:href="../../../../Templates/default.ott" meta:date="2026-03-04T11:21:22.271274060"/>
  </office:meta>
</office:document-meta>
</file>