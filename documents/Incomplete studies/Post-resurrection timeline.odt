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7in" table:align="margins" fo:keep-with-next="auto" style:may-break-between-rows="true"/>
    </style:style>
    <style:style style:name="Table1.A" style:family="table-column">
      <style:table-column-properties style:column-width="2.675in" style:rel-column-width="16383*"/>
    </style:style>
    <style:style style:name="Table1.D" style:family="table-column">
      <style:table-column-properties style:column-width="2.6757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d6cb35"/>
    </style:style>
    <style:style style:name="P2" style:family="paragraph" style:parent-style-name="Table_20_Contents">
      <style:text-properties officeooo:paragraph-rsid="00d6158e"/>
    </style:style>
    <style:style style:name="P3" style:family="paragraph" style:parent-style-name="Table_20_Contents">
      <style:text-properties officeooo:rsid="00d8c457" officeooo:paragraph-rsid="00d8c457"/>
    </style:style>
    <style:style style:name="P4" style:family="paragraph" style:parent-style-name="Table_20_Contents">
      <style:text-properties officeooo:paragraph-rsid="00d8c457"/>
    </style:style>
    <style:style style:name="P5" style:family="paragraph" style:parent-style-name="Table_20_Contents">
      <style:text-properties officeooo:paragraph-rsid="00d2bce0"/>
    </style:style>
    <style:style style:name="P6" style:family="paragraph" style:parent-style-name="Table_20_Contents">
      <style:text-properties officeooo:paragraph-rsid="00d0ec27"/>
    </style:style>
    <style:style style:name="P7" style:family="paragraph" style:parent-style-name="Table_20_Contents">
      <style:text-properties officeooo:paragraph-rsid="00d09b69"/>
    </style:style>
    <style:style style:name="P8" style:family="paragraph" style:parent-style-name="Table_20_Contents">
      <style:text-properties officeooo:paragraph-rsid="00455dd6"/>
    </style:style>
    <style:style style:name="P9" style:family="paragraph" style:parent-style-name="Table_20_Contents">
      <style:text-properties officeooo:paragraph-rsid="00ca6aed"/>
    </style:style>
    <style:style style:name="P10" style:family="paragraph" style:parent-style-name="Table_20_Contents">
      <style:text-properties officeooo:paragraph-rsid="004005fe"/>
    </style:style>
    <style:style style:name="P11" style:family="paragraph" style:parent-style-name="Table_20_Contents">
      <style:text-properties officeooo:paragraph-rsid="00d9a9b7"/>
    </style:style>
    <style:style style:name="P12" style:family="paragraph" style:parent-style-name="Table_20_Contents">
      <style:text-properties fo:color="#ff0000" loext:opacity="100%" officeooo:paragraph-rsid="00d9a9b7"/>
    </style:style>
    <style:style style:name="P13" style:family="paragraph" style:parent-style-name="Table_20_Contents">
      <style:text-properties officeooo:rsid="005265a2" officeooo:paragraph-rsid="005265a2"/>
    </style:style>
    <style:style style:name="P14" style:family="paragraph" style:parent-style-name="Table_20_Contents">
      <style:text-properties officeooo:paragraph-rsid="00cbe4ca"/>
    </style:style>
    <style:style style:name="P15" style:family="paragraph" style:parent-style-name="Table_20_Contents">
      <style:text-properties officeooo:paragraph-rsid="003e51c3"/>
    </style:style>
    <style:style style:name="P16" style:family="paragraph" style:parent-style-name="Table_20_Contents">
      <style:text-properties officeooo:rsid="00593d90" officeooo:paragraph-rsid="0063e8ed"/>
    </style:style>
    <style:style style:name="P17" style:family="paragraph" style:parent-style-name="Table_20_Contents">
      <style:text-properties officeooo:rsid="00593d90" officeooo:paragraph-rsid="00593d90"/>
    </style:style>
    <style:style style:name="P18" style:family="paragraph" style:parent-style-name="Table_20_Contents">
      <style:text-properties officeooo:rsid="005c21df" officeooo:paragraph-rsid="005c21df"/>
    </style:style>
    <style:style style:name="P19" style:family="paragraph" style:parent-style-name="Table_20_Contents">
      <style:text-properties officeooo:paragraph-rsid="0083d3ff"/>
    </style:style>
    <style:style style:name="P20" style:family="paragraph" style:parent-style-name="Table_20_Contents">
      <style:paragraph-properties style:writing-mode="lr-tb" style:writing-mode-automatic="false"/>
    </style:style>
    <style:style style:name="P21" style:family="paragraph" style:parent-style-name="Table_20_Contents">
      <style:text-properties fo:background-color="#ffff00"/>
    </style:style>
    <style:style style:name="P22" style:family="paragraph" style:parent-style-name="Table_20_Contents">
      <style:text-properties officeooo:paragraph-rsid="007640b6" fo:background-color="transparent"/>
    </style:style>
    <style:style style:name="P23" style:family="paragraph" style:parent-style-name="Table_20_Contents">
      <style:text-properties officeooo:paragraph-rsid="00783952" fo:background-color="transparent"/>
    </style:style>
    <style:style style:name="P24" style:family="paragraph" style:parent-style-name="Table_20_Contents">
      <style:text-properties officeooo:paragraph-rsid="00783952" fo:background-color="#ffff00"/>
    </style:style>
    <style:style style:name="P25" style:family="paragraph" style:parent-style-name="Table_20_Contents">
      <style:text-properties officeooo:rsid="00ecf8b5" officeooo:paragraph-rsid="00ecf8b5" fo:background-color="transparent"/>
    </style:style>
    <style:style style:name="P26" style:family="paragraph" style:parent-style-name="Table_20_Contents" style:list-style-name="L1">
      <style:text-properties officeooo:rsid="00ecf8b5" officeooo:paragraph-rsid="00ecf8b5" fo:background-color="transparent"/>
    </style:style>
    <style:style style:name="P27" style:family="paragraph" style:parent-style-name="Table_20_Contents">
      <style:text-properties officeooo:rsid="007bcbff" officeooo:paragraph-rsid="007bcbff" fo:background-color="transparent"/>
    </style:style>
    <style:style style:name="P28" style:family="paragraph" style:parent-style-name="Table_20_Contents">
      <style:text-properties officeooo:rsid="0089e0fb" officeooo:paragraph-rsid="0089e0fb" fo:background-color="transparent"/>
    </style:style>
    <style:style style:name="P29" style:family="paragraph" style:parent-style-name="Table_20_Contents" style:list-style-name="L2">
      <style:text-properties officeooo:paragraph-rsid="0089e0fb"/>
    </style:style>
    <style:style style:name="P30" style:family="paragraph" style:parent-style-name="Table_20_Contents" style:list-style-name="L2">
      <style:text-properties officeooo:rsid="0089e0fb" officeooo:paragraph-rsid="0089e0fb" fo:background-color="transparent"/>
    </style:style>
    <style:style style:name="P31" style:family="paragraph" style:parent-style-name="Table_20_Contents" style:list-style-name="L2">
      <style:text-properties officeooo:rsid="008af62e" officeooo:paragraph-rsid="008af62e" fo:background-color="transparent"/>
    </style:style>
    <style:style style:name="P32" style:family="paragraph" style:parent-style-name="Table_20_Contents" style:list-style-name="L2">
      <style:text-properties officeooo:rsid="008b722c" officeooo:paragraph-rsid="008b722c" fo:background-color="transparent"/>
    </style:style>
    <style:style style:name="P33" style:family="paragraph" style:parent-style-name="Table_20_Contents" style:list-style-name="L2">
      <style:text-properties officeooo:rsid="008d1d66" officeooo:paragraph-rsid="008d1d66" fo:background-color="transparent"/>
    </style:style>
    <style:style style:name="P34" style:family="paragraph" style:parent-style-name="Table_20_Contents">
      <style:text-properties officeooo:rsid="008d1d66" officeooo:paragraph-rsid="008d1d66" fo:background-color="transparent"/>
    </style:style>
    <style:style style:name="P35" style:family="paragraph" style:parent-style-name="Table_20_Contents">
      <style:text-properties officeooo:rsid="008f740c" officeooo:paragraph-rsid="008f740c" fo:background-color="transparent"/>
    </style:style>
    <style:style style:name="P36" style:family="paragraph" style:parent-style-name="Table_20_Contents" style:list-style-name="L3">
      <style:text-properties officeooo:rsid="008f740c" officeooo:paragraph-rsid="008f740c" fo:background-color="transparent"/>
    </style:style>
    <style:style style:name="P37" style:family="paragraph" style:parent-style-name="Table_20_Contents" style:list-style-name="L3">
      <style:text-properties officeooo:rsid="008f8e12" officeooo:paragraph-rsid="008f8e12" fo:background-color="transparent"/>
    </style:style>
    <style:style style:name="P38" style:family="paragraph" style:parent-style-name="Table_20_Contents">
      <style:text-properties officeooo:paragraph-rsid="0093ec72"/>
    </style:style>
    <style:style style:name="P39" style:family="paragraph" style:parent-style-name="Table_20_Contents">
      <style:text-properties officeooo:rsid="00e3b895" officeooo:paragraph-rsid="00e3b895"/>
    </style:style>
    <style:style style:name="P40" style:family="paragraph" style:parent-style-name="Table_20_Contents">
      <style:text-properties officeooo:paragraph-rsid="00e3b895"/>
    </style:style>
    <style:style style:name="P41" style:family="paragraph" style:parent-style-name="Table_20_Contents">
      <style:text-properties officeooo:paragraph-rsid="00bb6a8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d6cb35"/>
    </style:style>
    <style:style style:name="T4" style:family="text">
      <style:text-properties officeooo:rsid="00d8c457"/>
    </style:style>
    <style:style style:name="T5" style:family="text">
      <style:text-properties fo:background-color="#dee7e5" loext:char-shading-value="0"/>
    </style:style>
    <style:style style:name="T6" style:family="text">
      <style:text-properties officeooo:rsid="00d6158e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ff0000" loext:opacity="100%"/>
    </style:style>
    <style:style style:name="T9" style:family="text">
      <style:text-properties officeooo:rsid="001fa881"/>
    </style:style>
    <style:style style:name="T10" style:family="text">
      <style:text-properties fo:background-color="#dee6ef" loext:char-shading-value="0"/>
    </style:style>
    <style:style style:name="T11" style:family="text">
      <style:text-properties officeooo:rsid="00d0ec27"/>
    </style:style>
    <style:style style:name="T12" style:family="text">
      <style:text-properties officeooo:rsid="0020ed8a"/>
    </style:style>
    <style:style style:name="T13" style:family="text">
      <style:text-properties fo:color="#ff0000" loext:opacity="100%" fo:background-color="#ffff00" loext:char-shading-value="0"/>
    </style:style>
    <style:style style:name="T14" style:family="text">
      <style:text-properties fo:color="#ff0000" loext:opacity="100%" fo:background-color="#dee6ef" loext:char-shading-value="0"/>
    </style:style>
    <style:style style:name="T15" style:family="text">
      <style:text-properties officeooo:rsid="00455dd6"/>
    </style:style>
    <style:style style:name="T16" style:family="text">
      <style:text-properties officeooo:rsid="00523e02"/>
    </style:style>
    <style:style style:name="T17" style:family="text">
      <style:text-properties fo:color="#ff0000" loext:opacity="100%" officeooo:rsid="00523e02"/>
    </style:style>
    <style:style style:name="T18" style:family="text">
      <style:text-properties officeooo:rsid="00523f7a"/>
    </style:style>
    <style:style style:name="T19" style:family="text">
      <style:text-properties officeooo:rsid="0031e408"/>
    </style:style>
    <style:style style:name="T20" style:family="text">
      <style:text-properties fo:background-color="#ffbf00" loext:char-shading-value="0"/>
    </style:style>
    <style:style style:name="T21" style:family="text">
      <style:text-properties officeooo:rsid="005b1ad0"/>
    </style:style>
    <style:style style:name="T22" style:family="text">
      <style:text-properties officeooo:rsid="00609078"/>
    </style:style>
    <style:style style:name="T23" style:family="text">
      <style:text-properties officeooo:rsid="005c21df"/>
    </style:style>
    <style:style style:name="T24" style:family="text">
      <style:text-properties officeooo:rsid="00627620"/>
    </style:style>
    <style:style style:name="T25" style:family="text">
      <style:text-properties officeooo:rsid="0063e8ed"/>
    </style:style>
    <style:style style:name="T26" style:family="text">
      <style:text-properties officeooo:rsid="00647739"/>
    </style:style>
    <style:style style:name="T27" style:family="text">
      <style:text-properties officeooo:rsid="00698163"/>
    </style:style>
    <style:style style:name="T28" style:family="text">
      <style:text-properties officeooo:rsid="005d9a30"/>
    </style:style>
    <style:style style:name="T29" style:family="text">
      <style:text-properties officeooo:rsid="006cea12"/>
    </style:style>
    <style:style style:name="T30" style:family="text">
      <style:text-properties officeooo:rsid="006d29d2"/>
    </style:style>
    <style:style style:name="T31" style:family="text">
      <style:text-properties officeooo:rsid="006b65b7"/>
    </style:style>
    <style:style style:name="T32" style:family="text">
      <style:text-properties officeooo:rsid="006f0ca7"/>
    </style:style>
    <style:style style:name="T33" style:family="text">
      <style:text-properties fo:color="#ff0000" loext:opacity="100%" fo:background-color="transparent" loext:char-shading-value="0"/>
    </style:style>
    <style:style style:name="T34" style:family="text">
      <style:text-properties style:text-position="super 58%" officeooo:rsid="00364829" fo:background-color="transparent" loext:char-shading-value="0"/>
    </style:style>
    <style:style style:name="T35" style:family="text">
      <style:text-properties style:text-position="super 58%" fo:font-style="italic" officeooo:rsid="00364829" fo:background-color="transparent" loext:char-shading-value="0" style:font-style-asian="italic" style:font-style-complex="italic"/>
    </style:style>
    <style:style style:name="T36" style:family="text">
      <style:text-properties style:text-position="super 58%" officeooo:rsid="0037b39c" fo:background-color="transparent" loext:char-shading-value="0"/>
    </style:style>
    <style:style style:name="T37" style:family="text">
      <style:text-properties officeooo:rsid="00708853"/>
    </style:style>
    <style:style style:name="T38" style:family="text">
      <style:text-properties officeooo:rsid="0070fb79"/>
    </style:style>
    <style:style style:name="T39" style:family="text">
      <style:text-properties officeooo:rsid="00721494"/>
    </style:style>
    <style:style style:name="T40" style:family="text">
      <style:text-properties officeooo:rsid="0075cfbc"/>
    </style:style>
    <style:style style:name="T41" style:family="text">
      <style:text-properties officeooo:rsid="0078a9b6"/>
    </style:style>
    <style:style style:name="T42" style:family="text">
      <style:text-properties officeooo:rsid="0073f925"/>
    </style:style>
    <style:style style:name="T43" style:family="text">
      <style:text-properties officeooo:rsid="0082f8b0"/>
    </style:style>
    <style:style style:name="T44" style:family="text">
      <style:text-properties officeooo:rsid="00a06e3e"/>
    </style:style>
    <style:style style:name="T45" style:family="text">
      <style:text-properties style:text-position="super 58%" officeooo:rsid="00248a1e" fo:background-color="transparent" loext:char-shading-value="0"/>
    </style:style>
    <style:style style:name="T46" style:family="text">
      <style:text-properties style:text-position="super 58%" officeooo:rsid="00ed464f" fo:background-color="transparent" loext:char-shading-value="0"/>
    </style:style>
    <style:style style:name="T47" style:family="text">
      <style:text-properties style:text-position="super 58%" fo:background-color="transparent" loext:char-shading-value="0"/>
    </style:style>
    <style:style style:name="T48" style:family="text">
      <style:text-properties style:text-position="super 58%" officeooo:rsid="007fa9f1" fo:background-color="transparent" loext:char-shading-value="0"/>
    </style:style>
    <style:style style:name="T49" style:family="text">
      <style:text-properties style:text-position="super 58%" officeooo:rsid="007feeb5" fo:background-color="transparent" loext:char-shading-value="0"/>
    </style:style>
    <style:style style:name="T50" style:family="text">
      <style:text-properties style:text-position="super 58%" officeooo:rsid="0080b300" fo:background-color="transparent" loext:char-shading-value="0"/>
    </style:style>
    <style:style style:name="T51" style:family="text">
      <style:text-properties fo:color="#2a6099" loext:opacity="100%" fo:background-color="transparent" loext:char-shading-value="0"/>
    </style:style>
    <style:style style:name="T52" style:family="text">
      <style:text-properties style:text-position="super 58%" officeooo:rsid="0025a293" fo:background-color="transparent" loext:char-shading-value="0"/>
    </style:style>
    <style:style style:name="T53" style:family="text">
      <style:text-properties style:text-position="super 58%" officeooo:rsid="0026ef4c" fo:background-color="transparent" loext:char-shading-value="0"/>
    </style:style>
    <style:style style:name="T54" style:family="text">
      <style:text-properties officeooo:rsid="007640b6"/>
    </style:style>
    <style:style style:name="T55" style:family="text">
      <style:text-properties officeooo:rsid="00ecf8b5"/>
    </style:style>
    <style:style style:name="T56" style:family="text">
      <style:text-properties officeooo:rsid="008f740c"/>
    </style:style>
    <style:style style:name="T57" style:family="text">
      <style:text-properties officeooo:rsid="007d4fe0" fo:background-color="transparent" loext:char-shading-value="0"/>
    </style:style>
    <style:style style:name="T58" style:family="text">
      <style:text-properties officeooo:rsid="0087507d" fo:background-color="transparent" loext:char-shading-value="0"/>
    </style:style>
    <style:style style:name="T59" style:family="text">
      <style:text-properties officeooo:rsid="007eb333" fo:background-color="transparent" loext:char-shading-value="0"/>
    </style:style>
    <style:style style:name="T60" style:family="text">
      <style:text-properties officeooo:rsid="008a78e1"/>
    </style:style>
    <style:style style:name="T61" style:family="text">
      <style:text-properties officeooo:rsid="008a35b6"/>
    </style:style>
    <style:style style:name="T62" style:family="text">
      <style:text-properties officeooo:rsid="008af7e1"/>
    </style:style>
    <style:style style:name="T63" style:family="text">
      <style:text-properties officeooo:rsid="0090bcaf"/>
    </style:style>
    <style:style style:name="T64" style:family="text">
      <style:text-properties officeooo:rsid="008ed15a"/>
    </style:style>
    <style:style style:name="T65" style:family="text">
      <style:text-properties style:text-position="super 58%" officeooo:rsid="00ad28b7"/>
    </style:style>
    <style:style style:name="T66" style:family="text">
      <style:text-properties style:text-position="super 58%" officeooo:rsid="00e8309b"/>
    </style:style>
    <style:style style:name="T67" style:family="text">
      <style:text-properties style:text-position="super 58%" officeooo:rsid="00e71a96"/>
    </style:style>
    <style:style style:name="T68" style:family="text">
      <style:text-properties fo:color="#800080" loext:opacity="100%"/>
    </style:style>
    <style:style style:name="T69" style:family="text">
      <style:text-properties style:text-position="super 58%"/>
    </style:style>
    <style:style style:name="T70" style:family="text">
      <style:text-properties style:text-position="super 58%" officeooo:rsid="00b0adc3"/>
    </style:style>
    <style:style style:name="T71" style:family="text">
      <style:text-properties fo:color="#ff0000" loext:opacity="100%" fo:background-color="#ffbf00" loext:char-shading-value="0"/>
    </style:style>
    <style:style style:name="T72" style:family="text">
      <style:text-properties style:text-position="super 58%" officeooo:rsid="00ba620f"/>
    </style:style>
    <style:style style:name="T73" style:family="text">
      <style:text-properties officeooo:rsid="00e54222"/>
    </style:style>
    <style:style style:name="T74" style:family="text">
      <style:text-properties fo:color="#2a6099" loext:opacity="100%"/>
    </style:style>
    <style:style style:name="T75" style:family="text">
      <style:text-properties fo:color="#ff8000" loext:opacity="100%"/>
    </style:style>
    <style:style style:name="T76" style:family="text">
      <style:text-properties officeooo:rsid="00985a08"/>
    </style:style>
    <style:style style:name="T77" style:family="text">
      <style:text-properties style:text-position="super 58%" officeooo:rsid="00b4d2d6"/>
    </style:style>
    <style:style style:name="T78" style:family="text">
      <style:text-properties fo:color="#800080" loext:opacity="100%" fo:background-color="#fff5ce" loext:char-shading-value="0"/>
    </style:style>
    <style:style style:name="T79" style:family="text">
      <style:text-properties style:text-position="super 58%" officeooo:rsid="0037e486"/>
    </style:style>
    <style:style style:name="T80" style:family="text">
      <style:text-properties style:text-position="super 58%" officeooo:rsid="0090ee69"/>
    </style:style>
    <style:style style:name="T81" style:family="text">
      <style:text-properties officeooo:rsid="00e298e1"/>
    </style:style>
    <style:style style:name="T82" style:family="text">
      <style:text-properties fo:background-color="#ff00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ark 15:47<text:line-break/>And Mary Magdalene and Mary the mother of Joses beheld where he was laid.</text:p>
          </table:table-cell>
          <table:table-cell table:style-name="Table1.A1" office:value-type="string">
            <text:p text:style-name="Table_20_Contents">Luke 23:55-56<text:line-break/>55 And <text:span text:style-name="T1">the women</text:span> also, which came with him from Galilee, followed after, and beheld the sepulchre, and how his body was laid.<text:line-break/>56 And <text:span text:style-name="T1">they</text:span> returned, and prepared spices and ointments; and rested the sabbath day according to the commandment.</text:p>
          </table:table-cell>
          <table:table-cell table:style-name="Table1.D1" office:value-type="string">
            <text:p text:style-name="Table_20_Contents">John 19:41-42<text:line-break/>41 Now in the place where he was crucified there was a garden; and <text:span text:style-name="T1">in the garden a new sepulchre</text:span>, wherein was never man yet laid.<text:line-break/>42 There laid they Jesus therefore because of the Jews' preparation day; for the sepulchre was nigh at hand.</text:p>
          </table:table-cell>
        </table:table-row>
        <table:table-row table:style-name="Table1.1">
          <table:table-cell table:style-name="Table1.A2" office:value-type="string">
            <text:p text:style-name="Table_20_Contents">Matthew 28:1-7<text:line-break/>1 In the end of the sabbath, <text:span text:style-name="T1">as it began to dawn toward the first day of the week</text:span>, came Mary Magdalene and the other Mary to see the sepulchre.<text:line-break/>2 And, behold, <text:span text:style-name="T2">there was a great earthquake: for the angel of the Lord descended from heaven, and came and rolled back the stone from the door, and sat upon it.</text:span><text:line-break/>3 His countenance was like lightning, and his raiment white as snow:<text:line-break/>4 And for fear of him the keepers did shake, and became as dead men.<text:line-break/>5 And the angel answered and said unto <text:span text:style-name="T1">the women</text:span>, Fear not ye: for I know that ye seek Jesus, which was crucified.<text:line-break/>6 He is not here: for he is risen, as he said. Come, see the place where the Lord lay.<text:line-break/>7 And <text:span text:style-name="T1">go quickly, and tell his disciples</text:span> that he is risen from the dead; and, behold, he goeth before you into Galilee; there shall ye see him: lo, I have told you.</text:p>
          </table:table-cell>
          <table:table-cell table:style-name="Table1.A2" office:value-type="string">
            <text:p text:style-name="P1">Mark 16:1-<text:span text:style-name="T3">4</text:span><text:line-break/>1 And when the sabbath was past, Mary Magdalene, and Mary the mother of James, and Salome, had bought sweet spices, that they might come and anoint him.<text:line-break/>2 And <text:span text:style-name="T1">very early in the morning the first day of the week</text:span>, they came unto the sepulchre <text:span text:style-name="T1">at the rising of the sun.</text:span><text:line-break/>3 And they said among themselves, Who shall roll us away the stone from the door of the sepulchre?<text:line-break/>4 And <text:span text:style-name="T2">when they looked, they saw that the stone was rolled away</text:span>: for it was very great.</text:p>
          </table:table-cell>
          <table:table-cell table:style-name="Table1.A2" office:value-type="string">
            <text:p text:style-name="Table_20_Contents">Luke 24:1,<text:span text:style-name="T4">2</text:span><text:line-break/>1 Now <text:span text:style-name="T1">upon the first day of the week, very early in the morning,</text:span> <text:span text:style-name="T1">they</text:span> came unto the sepulchre, bringing the spices which <text:span text:style-name="T1">they</text:span> had prepared, and <text:span text:style-name="T5">certain others with them.</text:span><text:line-break/>2 <text:span text:style-name="T2">And they found the stone rolled away from the sepulchre.</text:span></text:p>
          </table:table-cell>
          <table:table-cell table:style-name="Table1.D2" office:value-type="string">
            <text:p text:style-name="Table_20_Contents">John 20:1<text:line-break/><text:span text:style-name="T1">The first day of the week</text:span> cometh Mary Magdalene <text:span text:style-name="T1">early, when it was yet dark</text:span>, unto the sepulchre, and <text:span text:style-name="T2">seeth the stone taken away from the sepulchre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ark 16:<text:span text:style-name="T3">5</text:span>-<text:span text:style-name="T6">7</text:span><text:line-break/>5 And entering into the sepulchre, they saw a young man sitting on the right side, clothed in a long white garment; and they were affrighted.<text:line-break/>6 And he saith unto them, Be not affrighted: Ye seek Jesus of Nazareth, which was crucified: he is risen; he is not here: behold the place where they laid him.</text:p>
            <text:p text:style-name="P2"><text:span text:style-name="T6">7 </text:span>But go your way<text:span text:style-name="T7">, tell </text:span><text:span text:style-name="T2">his disciples</text:span><text:span text:style-name="T7"> and </text:span><text:span text:style-name="T1">Peter</text:span><text:span text:style-name="T7"> </text:span>that he goeth before you into Galilee: there shall ye see him, as he said unto you.</text:p>
          </table:table-cell>
          <table:table-cell table:style-name="Table1.A2" office:value-type="string">
            <text:p text:style-name="P3">Luke 24:3-8</text:p>
            <text:p text:style-name="P4">3 And <text:span text:style-name="T1">they</text:span> entered in, and found not the body of the Lord Jesus.<text:line-break/>4 And it came to pass, as <text:span text:style-name="T1">they</text:span> were much perplexed thereabout, behold, two men stood by <text:span text:style-name="T1">them</text:span> in shining garments:<text:line-break/>5 And as <text:span text:style-name="T1">they</text:span> were afraid, and bowed down <text:span text:style-name="T1">their</text:span> faces to the earth, they said unto <text:span text:style-name="T1">them</text:span>, Why seek ye the living among the dead?<text:line-break/>6 He is not here, but is risen: remember how he spake unto <text:span text:style-name="T1">you</text:span> when he was yet in Galilee,<text:line-break/>7 Saying, <text:span text:style-name="T8">The Son of man must be delivered into the hands of sinful men, and be crucified, and the third day rise again.</text:span><text:line-break/>8 And <text:span text:style-name="T1">they</text:span> remembered his words,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>Mark 16:8<text:line-break/>And they went out quickly, and fled from the sepulchre; for they trembled and were amazed: neither said they any thing to any man; for they were afraid.</text:p>
          </table:table-cell>
          <table:table-cell table:style-name="Table1.A2" office:value-type="string">
            <text:p text:style-name="P6"><text:span text:style-name="T9">Luke 24:</text:span>9</text:p>
            <text:p text:style-name="P6">9 And returned from the sepulchre, and told all these things <text:span text:style-name="T1">unto the eleven, and to all the rest.</text:span></text:p>
          </table:table-cell>
          <table:table-cell table:style-name="Table1.D2" office:value-type="string">
            <text:p text:style-name="Table_20_Contents">John 20:2<text:line-break/>Then she runneth, and cometh to <text:span text:style-name="T1">Simon Peter</text:span>, and to the other disciple, whom Jesus loved, and saith unto them, They have taken away the Lord out of the sepulchre, and <text:span text:style-name="T10">we</text:span> know not where they have laid him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<text:span text:style-name="T9">Luke 24:</text:span><text:span text:style-name="T11">10</text:span>-<text:span text:style-name="T12">12</text:span><text:line-break/>10 It was Mary Magdalene, and Joanna, and Mary the mother of James, and other women that were with them, which told these things unto the apostles.<text:line-break/>11 And their words seemed to them as idle tales, and they believed them not.</text:p>
            <text:p text:style-name="P7">12 Then arose Peter, and ran unto the sepulchre; and stooping down, he beheld the linen clothes laid by themselves, and departed, wondering in himself at that which was come to pass.</text:p>
          </table:table-cell>
          <table:table-cell table:style-name="Table1.D2" office:value-type="string">
            <text:p text:style-name="Table_20_Contents">John 20:3-10<text:line-break/>3 Peter therefore went forth, and that other disciple, and came to the sepulchre.<text:line-break/>...<text:line-break/>10 Then the disciples went away <text:span text:style-name="T1">again</text:span> unto their own home.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Mark 16:9<text:line-break/>Now when <text:span text:style-name="T8">Jesus</text:span> was risen early the first day of the week, <text:span text:style-name="T13">he</text:span><text:span text:style-name="T1"> appeared first to Mary Magdalene</text:span>, out of whom he had cast seven devils.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>John 20:11-17<text:line-break/>11 <text:span text:style-name="T1">But</text:span> Mary stood without at the sepulchre weeping: and as she wept, she stooped down, and looked into the sepulchre,<text:line-break/>...<text:line-break/>17 Jesus saith unto her, <text:span text:style-name="T8">Touch me not; for I am not yet ascended to my Father: but </text:span><text:span text:style-name="T14">go to my brethren</text:span><text:span text:style-name="T8">, and say unto them, I ascend unto my Father, and your Father; and to my God, and your Go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1">Matthew 28:<text:span text:style-name="T15">8</text:span>-10</text:p>
            <text:p text:style-name="P11">8 And they departed quickly from the sep<text:span text:style-name="T7">ulchre with fear and great joy; and did run to bring his disciples word.<text:line-break/>9 And as they went to tell his disciples, </text:span>behold, Jesus met them, saying, <text:span text:style-name="T8">All hail.</text:span> And they came and <text:span text:style-name="T1">held him by the feet</text:span>, and worshipped him.<text:line-break/>10 Then said Jesus unto them, <text:span text:style-name="T8">Be not afraid: </text:span><text:span text:style-name="T14">go tell my brethren that they go into Galilee, and there shall they see me.</text:span></text:p>
            <text:p text:style-name="P12"/>
            <text:p text:style-name="P11">NOTE: In John <text:span text:style-name="T16">20:17 Mary is at the sepulchre and Jesus tells her “</text:span><text:span text:style-name="T17">touch me not; for I am not yet ascended to my Father</text:span><text:span text:style-name="T16">”. On the way back from the sepulchre, Jesus meets the woman as a group and they are allowed to touch Him. </text:span><text:span text:style-name="T18">Meaning, He ascended to the Father in between those two events.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>Mark 16:10-<text:span text:style-name="T19">11</text:span><text:line-break/><text:span text:style-name="T19">10 </text:span>And she went and told <text:span text:style-name="T1">them that had been with him</text:span>, as they mourned and wept.<text:line-break/><text:span text:style-name="T19">11 </text:span>And <text:span text:style-name="T1">they</text:span>, when <text:span text:style-name="T1">they</text:span> had heard that he was alive, and had been seen of <text:span text:style-name="T20">her</text:span>, believed not.</text:p>
            <text:p text:style-name="P15"/>
            <text:p text:style-name="P16">NOTE: when the woman left <text:span text:style-name="T21">the sepulchre </text:span>to get Peter <text:span text:style-name="T22">&amp;</text:span> John, Mary Magdalene <text:span text:style-name="T23">alone</text:span><text:span text:style-name="T24"> </text:span><text:span text:style-name="T25">went to get them and </text:span><text:span text:style-name="T23">came back with them </text:span><text:span text:style-name="T24">(John 20:2) </text:span><text:span text:style-name="T23">and she met Jesus outside the sepulchre after Peter </text:span><text:span text:style-name="T26">&amp;</text:span><text:span text:style-name="T23"> John </text:span><text:span text:style-name="T26">had returned home</text:span><text:span text:style-name="T23">.</text:span></text:p>
            <text:p text:style-name="P17"/>
            <text:p text:style-name="P18">NOTE: <text:span text:style-name="T27">At first glance it appears that </text:span>Peter <text:span text:style-name="T22">&amp;</text:span> John were together but not in the same place (Mark 16:7, John 20:2,<text:span text:style-name="T28">10</text:span>). <text:span text:style-name="T27">But, Luke 24:22-24 and John 20:10 confirms that all the disciples </text:span><text:span text:style-name="T29">(and the rest Luke 24:</text:span><text:span text:style-name="T30">9</text:span><text:span text:style-name="T29">) </text:span><text:span text:style-name="T27">lived in one home </text:span><text:span text:style-name="T31">(Levi/Matthew’s house was big enough: Mat</text:span><text:span text:style-name="T32">thew</text:span><text:span text:style-name="T31"> 9:9,10, Mark 2:14,15, Luke 5:27-29).</text:span>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>John 20:17-18<text:line-break/>17 Jesus saith unto her, <text:span text:style-name="T33">Touch me not; for I am not yet ascended to my Father: but </text:span><text:span text:style-name="T13">go to my brethren</text:span><text:span text:style-name="T33">, and say unto them, I ascend unto my Father, and your Father; and to my God, and your God.</text:span><text:line-break/>18 Mary Magdalene came and told the disciples that she had seen the Lord, and that he had spoken these things unto her.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rk 16:12-13<text:line-break/>12 After that he appeared in another form unto two of <text:span text:style-name="T1">them</text:span><text:span text:style-name="T34">[“</text:span><text:span text:style-name="T35">them that had been with him</text:span><text:span text:style-name="T34">”; v10; the </text:span><text:span text:style-name="T36">disciples</text:span><text:span text:style-name="T34">]</text:span>, as they walked, and went into the country.<text:line-break/>13 And <text:span text:style-name="T1">they</text:span> went and told it unto <text:span text:style-name="T2">the residue</text:span>: neither believed they <text:span text:style-name="T1">them</text:span>.</text:p>
            <text:p text:style-name="Table_20_Contents"/>
            <text:p text:style-name="P19">NOTE: <text:span text:style-name="T37">because we know </text:span><text:span text:style-name="T38">M</text:span><text:span text:style-name="T37">ary Magdalene went to Peter &amp; John </text:span><text:span text:style-name="T39">specifically</text:span><text:span text:style-name="T37"> </text:span><text:span text:style-name="T40">after they all returned </text:span><text:span text:style-name="T41">from</text:span><text:span text:style-name="T40"> the sepulchre </text:span><text:span text:style-name="T37">(John 20:2) and the other disciples (Luke 24:</text:span><text:span text:style-name="T38">9,</text:span><text:span text:style-name="T37">10), </text:span><text:span text:style-name="T42">and we also know they all lived in the same home (John 20:10) then we know that these two disciples left for Emmaus some time after Peter, John, and Mary Magdalene had </text:span><text:span text:style-name="T43">all </text:span><text:span text:style-name="T42">returned from the sepulchre </text:span><text:span text:style-name="T44">(and after Mary Magdalene was the first to see Jesus: Mark 16:9).</text:span></text:p>
          </table:table-cell>
          <table:table-cell table:style-name="Table1.A2" office:value-type="string">
            <text:p text:style-name="P20">Luke 24:13-24<text:line-break/>13 And, behold, two of <text:span text:style-name="T1">them</text:span><text:span text:style-name="T45">[</text:span><text:span text:style-name="T46">the eleven, and to all the rest v9</text:span><text:span text:style-name="T45">]</text:span> went that same day to a village called Emmaus, which was<text:span text:style-name="T7"> from Jerusalem about threescore furlongs</text:span><text:span text:style-name="T47"> </text:span><text:span text:style-name="T48">[~7.5 miles; </text:span><text:span text:style-name="T49">~3hr walk </text:span><text:span text:style-name="T50">@ 2.5mph</text:span><text:span text:style-name="T48">]</text:span><text:span text:style-name="T7">.<text:line-break/></text:span><text:span text:style-name="T51">...</text:span><text:line-break/>22 <text:span text:style-name="T1">Yea, and certain women also of our company made us astonished, which were early at the sepulchre;</text:span><text:line-break/>23 <text:span text:style-name="T1">And when they found not his body, they came, saying, that they had also seen a vision of angels, which said that he was alive.</text:span><text:line-break/>24 <text:span text:style-name="T1">And certain of them which were with us</text:span><text:span text:style-name="T47"> </text:span><text:span text:style-name="T52">[Peter &amp; John; </text:span><text:span text:style-name="T53">John 20:3-10</text:span><text:span text:style-name="T52">] </text:span><text:span text:style-name="T1">went to the sepulchre, and found it even so as the women had said: but him they saw not.</text:span></text:p>
            <text:p text:style-name="P21"/>
            <text:p text:style-name="P22">Luke 24:<text:span text:style-name="T54">1</text:span>3-35</text:p>
            <text:p text:style-name="P23">13 And, behold, two of them went that same day to a village called Emmaus, which was from Jerusalem about threescore furlongs.</text:p>
            <text:p text:style-name="P24"><text:span text:style-name="T7">...</text:span><text:line-break/><text:span text:style-name="T7">33 And they rose up the same hour, and returned to Jerusalem, and </text:span><text:span text:style-name="T20">found the eleven gathered together</text:span><text:span text:style-name="T7">, and them that were with them,<text:line-break/>34 Saying, The Lord is risen indeed, </text:span><text:span text:style-name="T20">and hath appeared to Simon.</text:span><text:span text:style-name="T7"><text:line-break/>35 And they told what things were done in the way, and how </text:span><text:span text:style-name="T33">he</text:span><text:span text:style-name="T7"> was known of them in breaking of bread.</text:span></text:p>
            <text:p text:style-name="P23"/>
            <text:p text:style-name="P25">Most likely candidate:</text:p>
            <text:list text:style-name="L1">
              <text:list-item>
                <text:p text:style-name="P26"><text:soft-page-break/>Simon Peter (1Cor 15:5)</text:p>
              </text:list-item>
            </text:list>
            <text:p text:style-name="P27"/>
            <text:p text:style-name="P28"><text:span text:style-name="T55">Other</text:span><text:span text:style-name="T56"> </text:span>Candidates:</text:p>
            <text:list text:style-name="L2">
              <text:list-item>
                <text:p text:style-name="P29"><text:span text:style-name="T57">Simon the brother of the </text:span><text:span text:style-name="T58">Jesus Christ our Lord</text:span><text:span text:style-name="T57"> (Matthew 13:55, </text:span><text:span text:style-name="T59">Mark 6:3</text:span><text:span text:style-name="T57">)</text:span></text:p>
              </text:list-item>
              <text:list-item>
                <text:p text:style-name="P30">Simon of Cyrene the cross-bearer <text:span text:style-name="T60">and father of Alexander and Rufus </text:span>(Matthew 27:32, <text:span text:style-name="T61">Mark 15:21</text:span>)</text:p>
              </text:list-item>
              <text:list-item>
                <text:p text:style-name="P31">Simon the leper (Matthew 26:6, <text:span text:style-name="T62">Mark 14:3)</text:span></text:p>
              </text:list-item>
              <text:list-item>
                <text:p text:style-name="P32">Simon the Pharisee (Luke 7:36-50)</text:p>
              </text:list-item>
              <text:list-item>
                <text:p text:style-name="P33">Simon <text:span text:style-name="T63">the </text:span>father of Judas Iscariot (John 6:71, <text:span text:style-name="T64">13,2,26</text:span>)</text:p>
              </text:list-item>
            </text:list>
            <text:p text:style-name="P34"/>
            <text:p text:style-name="P35">Unlikely candidates:</text:p>
            <text:list text:style-name="L3">
              <text:list-item>
                <text:p text:style-name="P36">Simon the sorcerer (Acts 8:9,13,18)</text:p>
              </text:list-item>
              <text:list-item>
                <text:p text:style-name="P37">Simon the tanner (Acts 9:43, 10:6,17,32)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Table_20_Contents">Luke 24:36-53<text:line-break/>36 And as they <text:span text:style-name="T65">[the two disciples that returned from Emmaus </text:span><text:span text:style-name="T66">v33</text:span><text:span text:style-name="T65">; </text:span><text:span text:style-name="T67">the first day of the week v1,13,29,33</text:span><text:span text:style-name="T65">]</text:span> thus spake, <text:span text:style-name="T68">Jesus</text:span> <text:span text:style-name="T68">himself</text:span> stood in the midst of them, and saith unto them, <text:span text:style-name="T8">Peace be unto you.</text:span><text:line-break/>37 But they were terrified and affrighted, and supposed that they had seen a spirit.<text:line-break/>38 And <text:span text:style-name="T68">he</text:span> said unto them, <text:span text:style-name="T8">Why are ye troubled? and why do thoughts arise in your hearts?</text:span><text:line-break/>39 <text:span text:style-name="T8">Behold my hands and my feet, that it is I myself: handle me, and see; for a spirit hath not flesh and bones, as ye see me have.</text:span><text:line-break/>40 And when he had thus spoken, he shewed them his hands and his <text:soft-page-break/>feet.<text:line-break/>41 And while they yet believed not for joy, and wondered, he said unto them, <text:span text:style-name="T8">Have ye here any meat?</text:span><text:line-break/>42 And they gave him a piece of a broiled fish, and of an honeycomb.<text:line-break/>43 And he took it, and did eat before them.<text:line-break/>44 And he said unto them, <text:span text:style-name="T8">These are the words which I spake unto you, while I was yet with you</text:span><text:span text:style-name="T69"> [</text:span><text:span text:style-name="T70">the eleven; </text:span><text:span text:style-name="T69">Mat 16:21, Mar 8:31, Luk 9:22, Joh 16:4]</text:span><text:span text:style-name="T8">, that all things must be fulfilled, which were written in the law of Moses, and in the prophets, and in the psalms, concerning me.</text:span><text:line-break/>45 Then opened he their understanding, that they might understand the scriptures,<text:line-break/>46 And said unto them, <text:span text:style-name="T8">Thus it is written, and thus it behoved Christ to suffer, and to rise from the dead the third day:</text:span><text:line-break/>47 <text:span text:style-name="T8">And that repentance and remission of sins should be preached in his name among all nations, beginning at Jerusalem.</text:span><text:line-break/>48 <text:span text:style-name="T8">And ye are witnesses of these things.</text:span><text:line-break/>49 <text:span text:style-name="T8">And, behold, I send the promise of my Father upon you: but </text:span><text:span text:style-name="T71">tarry ye in the city of Jerusalem, until ye be endued with power from on high.</text:span><text:line-break/>50 And he led them out as far as to Bethany<text:span text:style-name="T69"> </text:span><text:span text:style-name="T72">[~1mile east]</text:span>, and he lifted up his hands, and blessed them.<text:line-break/>51 And it came to pass, while he blessed them, he was parted from them, and carried up into heaven.<text:line-break/>52 And they worshipped him, and <text:span text:style-name="T20">returned to Jerusalem with great joy:</text:span><text:line-break/><text:soft-page-break/>53 And were continually in the temple, praising and blessing God. Amen.</text:p>
          </table:table-cell>
          <table:table-cell table:style-name="Table1.D2" office:value-type="string">
            <text:p text:style-name="Table_20_Contents">John 20:19-<text:span text:style-name="T73">25</text:span><text:line-break/>19 <text:span text:style-name="T1">Then the same day at evening, being the first day of the week</text:span>, when the doors were shut where the disciples were assembled for fear of the Jews, came <text:span text:style-name="T68">Jesus</text:span> and stood in the midst, and saith unto them, <text:span text:style-name="T8">Peace be unto you.</text:span><text:line-break/>20 And when <text:span text:style-name="T68">he</text:span> had so said, <text:span text:style-name="T68">he</text:span> shewed unto them <text:span text:style-name="T68">his</text:span> hands and <text:span text:style-name="T68">his</text:span> side. Then were the disciples glad, when they saw the <text:span text:style-name="T68">Lord</text:span>.<text:line-break/>21 Then said <text:span text:style-name="T68">Jesus</text:span> to them again, <text:span text:style-name="T8">Peace be unto you: as my Father hath sent me, even so send I you.</text:span><text:line-break/>22 And when he had said this, he breathed on them, and saith unto them, <text:span text:style-name="T8">Receive ye the Holy Ghost:</text:span><text:line-break/><text:soft-page-break/>23 <text:span text:style-name="T8">Whose soever sins ye remit, they are remitted unto them; and whose soever sins ye retain, they are retained.</text:span><text:line-break/>24 But Thomas, one of the twelve, called Didymus, was not with them when Jesus came.<text:line-break/>25 The other disciples therefore said unto him, <text:span text:style-name="T74">We have seen the Lord</text:span>. But he said unto them, <text:span text:style-name="T75">Except I shall see in his hands the print of the nails, and put my finger into the print of the nails, and thrust my hand into his side, I will not believe.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9">John 20:26-31</text:p>
            <text:p text:style-name="P40">26 And after eight days again <text:span text:style-name="T68">his</text:span> disciples were within, and Thomas with them: then came <text:span text:style-name="T68">Jesus</text:span>, the doors being shut, and stood in the midst, and said, <text:span text:style-name="T8">Peace be unto you.</text:span><text:line-break/>27 Then saith he to Thomas, <text:span text:style-name="T8">Reach hither thy finger, and behold my hands; and reach hither thy hand, and thrust it into my side: and be not faithless, but believing.</text:span><text:line-break/>28 And Thomas answered and said unto him, <text:span text:style-name="T75">My Lord and my God.</text:span><text:line-break/>29 Jesus saith unto him, <text:span text:style-name="T8">Thomas, because thou hast seen me, thou hast believed: blessed are they that have not seen, and yet have believed.</text:span><text:line-break/>30 And many other signs truly did Jesus in the presence of his disciples, which are not written in this book:<text:line-break/>31 But these are written, that ye might believe that Jesus is the Christ, the Son of God; and that believing ye might have life through his name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Matthew 28:16-20<text:line-break/>16 Then the eleven disciples went away into <text:span text:style-name="T1">Galilee</text:span>, into a mountain where Jesus had appointed them.<text:line-break/>17 And when they saw him, they worshipped him: <text:span text:style-name="T2">but some doubted.</text:span><text:line-break/>18 And Jesus came and spake unto them, saying, <text:span text:style-name="T8">All power is given unto me in heaven and in earth.</text:span><text:line-break/>19 <text:span text:style-name="T8">Go ye therefore, and teach all nations, baptizing them in the name of the Father, and of the Son, and of the Holy Ghost:</text:span><text:line-break/>20 <text:span text:style-name="T8">Teaching them to observe all things whatsoever I have commanded you: and, lo, I am with you alway, even unto the end of the world. Amen.</text:span></text:p>
          </table:table-cell>
          <table:table-cell table:style-name="Table1.A2" office:value-type="string">
            <text:p text:style-name="P41">Mark 16:14-20<text:line-break/><text:span text:style-name="T76">14 </text:span><text:span text:style-name="T1">Afterward</text:span><text:span text:style-name="T69"> [the two disciples went and told the residue and they didn’t believe them]</text:span> <text:span text:style-name="T68">he</text:span> appeared <text:span text:style-name="T1">unto the eleven</text:span> as they sat at meat, and <text:span text:style-name="T2">upbraided them</text:span><text:span text:style-name="T69"> [the Luke &amp; John “first visit” </text:span><text:span text:style-name="T77">when the two disciples from Emmaus returned</text:span><text:span text:style-name="T69"> has no record of the eleven being upbraided]</text:span> with their unbelief and hardness of heart, <text:span text:style-name="T2">because they believed not them which had seen </text:span><text:span text:style-name="T78">him</text:span><text:span text:style-name="T2"> after </text:span><text:span text:style-name="T78">he</text:span><text:span text:style-name="T2"> was risen</text:span> <text:span text:style-name="T79">[</text:span><text:span text:style-name="T80">Mary Magdalene and</text:span><text:span text:style-name="T79"> the two disciples on the road to Emmaus]</text:span>.<text:line-break/>15 And <text:span text:style-name="T68">he</text:span> said unto them, <text:span text:style-name="T8">Go ye into all the world, and preach the gospel to every creature.</text:span><text:line-break/>16 <text:span text:style-name="T8">He that believeth and is baptized shall be saved; but he that believeth not shall be damned.</text:span><text:line-break/>17 <text:span text:style-name="T8">And these signs shall follow them that believe; In my name shall they cast out devils; they shall speak with new tongues;</text:span><text:line-break/>18 <text:span text:style-name="T8">They shall take up serpents; and if they drink any deadly thing, it shall not hurt them; they shall lay hands on the sick, and they shall recover.</text:span><text:line-break/>19 So then after the Lord had spoken unto them, he was received up into heaven, <text:span text:style-name="T1">and sat on the right hand of God.</text:span><text:span text:style-name="T69"> [He didn’t sit down the first time: Luke 24:51]</text:span><text:line-break/>20 And they went forth, and preached every where, the Lord working with them, and confirming the word with signs following. Amen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John 21:1-<text:span text:style-name="T81">14</text:span><text:line-break/><text:span text:style-name="T1">After these things</text:span> Jesus shewed himself <text:span text:style-name="T82">again</text:span> to the disciples at <text:span text:style-name="T1">the sea of Tiberias</text:span>; and on this wise shewed he himself.</text:p>
            <text:p text:style-name="Table_20_Contents">…</text:p>
            <text:p text:style-name="Table_20_Contents">14 <text:span text:style-name="T1">This is now the third time</text:span> that Jesus shewed himself to his disciples, after that he was risen from the dea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6T08:49:24.753746000</meta:creation-date>
    <dc:title>default</dc:title>
    <meta:editing-duration>PT10H35M7S</meta:editing-duration>
    <meta:editing-cycles>212</meta:editing-cycles>
    <meta:generator>LibreOffice/26.2.2.2$Windows_X86_64 LibreOffice_project/1f77d10d6938fd34972958f64b2bcfa54f8b1ba5</meta:generator>
    <dc:date>2026-04-09T17:44:42.867380600</dc:date>
    <meta:document-statistic meta:table-count="1" meta:image-count="0" meta:object-count="0" meta:page-count="10" meta:paragraph-count="53" meta:word-count="2755" meta:character-count="14458" meta:non-whitespace-character-count="11764"/>
    <meta:template xlink:type="simple" xlink:actuate="onRequest" xlink:title="default" xlink:href="../../AppData/Roaming/LibreOffice/4/user/template/default1.ott" meta:date="2026-04-06T08:49:23.590059400"/>
  </office:meta>
</office:document-meta>
</file>