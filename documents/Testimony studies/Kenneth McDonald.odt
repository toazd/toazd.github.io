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0" style:family="table">
      <style:table-properties style:width="8.4in" table:align="margins"/>
    </style:style>
    <style:style style:name="Table10.A" style:family="table-column">
      <style:table-column-properties style:column-width="8.4in" style:rel-column-width="65535*"/>
    </style:style>
    <style:style style:name="Table10.A1" style:family="table-cell">
      <style:table-cell-properties fo:padding="0.0382in" fo:border="0.5pt solid #000000"/>
    </style:style>
    <style:style style:name="Table11" style:family="table">
      <style:table-properties style:width="8.4in" table:align="margins"/>
    </style:style>
    <style:style style:name="Table11.A" style:family="table-column">
      <style:table-column-properties style:column-width="8.4in" style:rel-column-width="65535*"/>
    </style:style>
    <style:style style:name="Table11.A1" style:family="table-cell">
      <style:table-cell-properties fo:padding="0.0382in" fo:border="0.5pt solid #000000"/>
    </style:style>
    <style:style style:name="Table1" style:family="table">
      <style:table-properties style:width="8.4in" table:align="margins"/>
    </style:style>
    <style:style style:name="Table1.A" style:family="table-column">
      <style:table-column-properties style:column-width="8.4in" style:rel-column-width="65535*"/>
    </style:style>
    <style:style style:name="Table1.A1" style:family="table-cell">
      <style:table-cell-properties fo:padding="0.0382in" fo:border="0.5pt solid #000000"/>
    </style:style>
    <style:style style:name="Table3" style:family="table">
      <style:table-properties style:width="8.4in" table:align="margins"/>
    </style:style>
    <style:style style:name="Table3.A" style:family="table-column">
      <style:table-column-properties style:column-width="8.4in" style:rel-column-width="65535*"/>
    </style:style>
    <style:style style:name="Table3.A1" style:family="table-cell">
      <style:table-cell-properties fo:padding="0.0382in" fo:border="0.5pt solid #000000"/>
    </style:style>
    <style:style style:name="Table4" style:family="table">
      <style:table-properties style:width="8.4in" table:align="margins"/>
    </style:style>
    <style:style style:name="Table4.A" style:family="table-column">
      <style:table-column-properties style:column-width="8.4in" style:rel-column-width="65535*"/>
    </style:style>
    <style:style style:name="Table4.A1" style:family="table-cell">
      <style:table-cell-properties fo:padding="0.0382in" fo:border="0.5pt solid #000000"/>
    </style:style>
    <style:style style:name="Table2" style:family="table">
      <style:table-properties style:width="8.4in" table:align="margins"/>
    </style:style>
    <style:style style:name="Table2.A" style:family="table-column">
      <style:table-column-properties style:column-width="8.4in" style:rel-column-width="65535*"/>
    </style:style>
    <style:style style:name="Table2.A1" style:family="table-cell">
      <style:table-cell-properties fo:padding="0.0382in" fo:border="0.5pt solid #000000"/>
    </style:style>
    <style:style style:name="Table13" style:family="table">
      <style:table-properties style:width="8.4in" table:align="margins"/>
    </style:style>
    <style:style style:name="Table13.A" style:family="table-column">
      <style:table-column-properties style:column-width="8.4in" style:rel-column-width="65535*"/>
    </style:style>
    <style:style style:name="Table13.A1" style:family="table-cell">
      <style:table-cell-properties fo:padding="0.0382in" fo:border="0.5pt solid #000000"/>
    </style:style>
    <style:style style:name="Table5" style:family="table">
      <style:table-properties style:width="8.4in" table:align="margins"/>
    </style:style>
    <style:style style:name="Table5.A" style:family="table-column">
      <style:table-column-properties style:column-width="8.4in" style:rel-column-width="65535*"/>
    </style:style>
    <style:style style:name="Table5.A1" style:family="table-cell">
      <style:table-cell-properties fo:padding="0.0382in" fo:border="0.5pt solid #000000"/>
    </style:style>
    <style:style style:name="Table6" style:family="table">
      <style:table-properties style:width="8.4in" table:align="margins"/>
    </style:style>
    <style:style style:name="Table6.A" style:family="table-column">
      <style:table-column-properties style:column-width="8.4in" style:rel-column-width="65535*"/>
    </style:style>
    <style:style style:name="Table6.A1" style:family="table-cell">
      <style:table-cell-properties fo:padding="0.0382in" fo:border="0.5pt solid #000000"/>
    </style:style>
    <style:style style:name="Table7" style:family="table">
      <style:table-properties style:width="8.4in" table:align="margins"/>
    </style:style>
    <style:style style:name="Table7.A" style:family="table-column">
      <style:table-column-properties style:column-width="8.4in" style:rel-column-width="65535*"/>
    </style:style>
    <style:style style:name="Table7.A1" style:family="table-cell">
      <style:table-cell-properties fo:padding="0.0382in" fo:border="0.5pt solid #000000"/>
    </style:style>
    <style:style style:name="Table8" style:family="table">
      <style:table-properties style:width="8.4in" table:align="margins"/>
    </style:style>
    <style:style style:name="Table8.A" style:family="table-column">
      <style:table-column-properties style:column-width="8.4in" style:rel-column-width="65535*"/>
    </style:style>
    <style:style style:name="Table8.A1" style:family="table-cell">
      <style:table-cell-properties fo:padding="0.0382in" fo:border="0.5pt solid #000000"/>
    </style:style>
    <style:style style:name="Table9" style:family="table">
      <style:table-properties style:width="8.4in" table:align="margins"/>
    </style:style>
    <style:style style:name="Table9.A" style:family="table-column">
      <style:table-column-properties style:column-width="8.4in" style:rel-column-width="65535*"/>
    </style:style>
    <style:style style:name="Table9.A1" style:family="table-cell">
      <style:table-cell-properties fo:padding="0.0382in" fo:border="0.5pt solid #000000"/>
    </style:style>
    <style:style style:name="Table12" style:family="table">
      <style:table-properties style:width="8.4in" table:align="margins"/>
    </style:style>
    <style:style style:name="Table12.A" style:family="table-column">
      <style:table-column-properties style:column-width="8.4in" style:rel-column-width="65535*"/>
    </style:style>
    <style:style style:name="Table12.A1" style:family="table-cell">
      <style:table-cell-properties fo:padding="0.0382in" fo:border="0.5pt solid #000000"/>
    </style:style>
    <style:style style:name="Table14" style:family="table">
      <style:table-properties style:width="8.4in" table:align="margins"/>
    </style:style>
    <style:style style:name="Table14.A" style:family="table-column">
      <style:table-column-properties style:column-width="8.4in" style:rel-column-width="65535*"/>
    </style:style>
    <style:style style:name="Table14.A1" style:family="table-cell">
      <style:table-cell-properties fo:padding="0.0382in" fo:border="0.5pt solid #000000"/>
    </style:style>
    <style:style style:name="P1" style:family="paragraph" style:parent-style-name="Standard">
      <style:text-properties officeooo:rsid="00108b8f" officeooo:paragraph-rsid="00108b8f"/>
    </style:style>
    <style:style style:name="P2" style:family="paragraph" style:parent-style-name="Standard">
      <style:text-properties officeooo:rsid="0043ce12" officeooo:paragraph-rsid="0043ce12"/>
    </style:style>
    <style:style style:name="P3" style:family="paragraph" style:parent-style-name="Table_20_Contents">
      <style:text-properties officeooo:paragraph-rsid="003038f6"/>
    </style:style>
    <style:style style:name="P4" style:family="paragraph" style:parent-style-name="Standard">
      <style:text-properties officeooo:rsid="001249e2" officeooo:paragraph-rsid="001249e2"/>
    </style:style>
    <style:style style:name="P5" style:family="paragraph" style:parent-style-name="Standard">
      <style:text-properties officeooo:rsid="0015a9a0" officeooo:paragraph-rsid="0015a9a0"/>
    </style:style>
    <style:style style:name="P6" style:family="paragraph" style:parent-style-name="Table_20_Contents">
      <style:text-properties fo:color="#127622" loext:opacity="100%" officeooo:paragraph-rsid="0015a9a0"/>
    </style:style>
    <style:style style:name="P7" style:family="paragraph" style:parent-style-name="Table_20_Contents">
      <style:text-properties officeooo:paragraph-rsid="0015a9a0"/>
    </style:style>
    <style:style style:name="P8" style:family="paragraph" style:parent-style-name="Table_20_Contents">
      <style:text-properties fo:color="#127622" loext:opacity="100%" officeooo:paragraph-rsid="0016cb29"/>
    </style:style>
    <style:style style:name="P9" style:family="paragraph" style:parent-style-name="Table_20_Contents">
      <style:text-properties officeooo:paragraph-rsid="0016cb29"/>
    </style:style>
    <style:style style:name="P10" style:family="paragraph" style:parent-style-name="Standard">
      <style:text-properties officeooo:rsid="0013ef24" officeooo:paragraph-rsid="0013ef24"/>
    </style:style>
    <style:style style:name="P11" style:family="paragraph" style:parent-style-name="Standard" style:list-style-name="L1">
      <style:text-properties officeooo:rsid="001aa7f2" officeooo:paragraph-rsid="001aa7f2"/>
    </style:style>
    <style:style style:name="P12" style:family="paragraph" style:parent-style-name="Standard" style:list-style-name="L1">
      <style:text-properties officeooo:rsid="001b2134" officeooo:paragraph-rsid="001b2134"/>
    </style:style>
    <style:style style:name="P13" style:family="paragraph" style:parent-style-name="Standard">
      <style:text-properties officeooo:rsid="001aa7f2" officeooo:paragraph-rsid="001aa7f2"/>
    </style:style>
    <style:style style:name="P14" style:family="paragraph" style:parent-style-name="Standard">
      <style:text-properties officeooo:rsid="001e02f9" officeooo:paragraph-rsid="001e02f9"/>
    </style:style>
    <style:style style:name="P15" style:family="paragraph" style:parent-style-name="Standard">
      <style:text-properties officeooo:rsid="001ffdab" officeooo:paragraph-rsid="001ffdab"/>
    </style:style>
    <style:style style:name="P16" style:family="paragraph" style:parent-style-name="Table_20_Contents">
      <style:text-properties officeooo:paragraph-rsid="00269c27"/>
    </style:style>
    <style:style style:name="P17" style:family="paragraph" style:parent-style-name="Standard">
      <style:text-properties officeooo:rsid="001ffdab" officeooo:paragraph-rsid="00269c27"/>
    </style:style>
    <style:style style:name="P18" style:family="paragraph" style:parent-style-name="Standard">
      <style:text-properties officeooo:rsid="003dde93" officeooo:paragraph-rsid="003dde93"/>
    </style:style>
    <style:style style:name="P19" style:family="paragraph" style:parent-style-name="Table_20_Contents">
      <style:text-properties officeooo:rsid="002316d6" officeooo:paragraph-rsid="00280ecf"/>
    </style:style>
    <style:style style:name="P20" style:family="paragraph" style:parent-style-name="Table_20_Contents">
      <style:text-properties fo:color="#ff0000" loext:opacity="100%" officeooo:rsid="002316d6" officeooo:paragraph-rsid="00280ecf"/>
    </style:style>
    <style:style style:name="P21" style:family="paragraph" style:parent-style-name="Table_20_Contents">
      <style:text-properties fo:color="#127622" loext:opacity="100%" officeooo:rsid="002316d6" officeooo:paragraph-rsid="00280ecf"/>
    </style:style>
    <style:style style:name="P22" style:family="paragraph" style:parent-style-name="Standard">
      <style:text-properties officeooo:rsid="001ffdab" officeooo:paragraph-rsid="00280ecf"/>
    </style:style>
    <style:style style:name="P23" style:family="paragraph" style:parent-style-name="Table_20_Contents">
      <style:text-properties officeooo:paragraph-rsid="00315357"/>
    </style:style>
    <style:style style:name="T1" style:family="text">
      <style:text-properties fo:color="#127622" loext:opacity="100%"/>
    </style:style>
    <style:style style:name="T2" style:family="text">
      <style:text-properties fo:background-color="#fff5ce" loext:char-shading-value="0"/>
    </style:style>
    <style:style style:name="T3" style:family="text">
      <style:text-properties style:text-position="33% 80%" officeooo:rsid="003038f6"/>
    </style:style>
    <style:style style:name="T4" style:family="text">
      <style:text-properties style:text-position="33% 80%"/>
    </style:style>
    <style:style style:name="T5" style:family="text">
      <style:text-properties style:use-window-font-color="true" loext:opacity="0%" fo:background-color="#fff5ce" loext:char-shading-value="0"/>
    </style:style>
    <style:style style:name="T6" style:family="text">
      <style:text-properties fo:background-color="#ffdbb6" loext:char-shading-value="0"/>
    </style:style>
    <style:style style:name="T7" style:family="text">
      <style:text-properties fo:background-color="#f7d1d5" loext:char-shading-value="0"/>
    </style:style>
    <style:style style:name="T8" style:family="text">
      <style:text-properties fo:background-color="#dedce6" loext:char-shading-value="0"/>
    </style:style>
    <style:style style:name="T9" style:family="text">
      <style:text-properties officeooo:rsid="001ffdab"/>
    </style:style>
    <style:style style:name="T10" style:family="text">
      <style:text-properties fo:color="#127622" loext:opacity="100%" officeooo:rsid="00203f06"/>
    </style:style>
    <style:style style:name="T11" style:family="text">
      <style:text-properties style:text-position="super 58%" officeooo:rsid="003dde93" fo:background-color="#fff5ce" loext:char-shading-value="0"/>
    </style:style>
    <style:style style:name="T12" style:family="text">
      <style:text-properties fo:color="#ff0000" loext:opacity="100%"/>
    </style:style>
    <style:style style:name="T13" style:family="text">
      <style:text-properties officeooo:rsid="0024b12f"/>
    </style:style>
    <style:style style:name="T14" style:family="text">
      <style:text-properties style:use-window-font-color="true" loext:opacity="0%" style:text-position="33% 80%"/>
    </style:style>
    <style:style style:name="T15" style:family="text">
      <style:text-properties style:use-window-font-color="true" loext:opacity="0%"/>
    </style:style>
    <style:style style:name="T16" style:family="text">
      <style:text-properties style:use-window-font-color="true" loext:opacity="0%" style:text-position="33% 80%" officeooo:rsid="0024b12f"/>
    </style:style>
    <style:style style:name="T17" style:family="text">
      <style:text-properties fo:color="#127622" loext:opacity="100%" style:text-position="33% 80%"/>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a xlink:type="simple" xlink:href="https://www.youtube.com/watch?v=Ybm1Zc1Mm64" text:style-name="Internet_20_link" text:visited-style-name="Visited_20_Internet_20_Link">https://www.youtube.com/watch?v=Ybm1Zc1Mm64</text:a></text:p>
      <text:p text:style-name="Standard"/>
      <text:p text:style-name="P1">Kenneth McDonald “testimony”.</text:p>
      <text:p text:style-name="P2"/>
      <text:p text:style-name="P2"/>
      <table:table table:name="Table10" table:style-name="Table10">
        <table:table-column table:style-name="Table10.A"/>
        <table:table-row>
          <table:table-cell table:style-name="Table10.A1" office:value-type="string">
            <text:p text:style-name="Table_20_Contents"><text:span text:style-name="T1">Isaiah 14:14</text:span><text:line-break/>I will ascend above the heights of the clouds; <text:span text:style-name="T2">I will be like the most High</text:span>.</text:p>
          </table:table-cell>
        </table:table-row>
      </table:table>
      <text:p text:style-name="P1"/>
      <table:table table:name="Table11" table:style-name="Table11">
        <table:table-column table:style-name="Table11.A"/>
        <table:table-row>
          <table:table-cell table:style-name="Table11.A1" office:value-type="string">
            <text:p text:style-name="P3"><text:span text:style-name="T1">2 Corinthians 11:14-15</text:span><text:line-break/><text:span text:style-name="T3">14 </text:span>And no marvel; for <text:span text:style-name="T2">Satan himself is transformed into an angel of light</text:span>.</text:p>
            <text:p text:style-name="P3"><text:span text:style-name="T4">15</text:span> Therefore it is no great thing if his ministers also be transformed as the ministers of righteousness; whose end shall be according to their works.</text:p>
          </table:table-cell>
        </table:table-row>
      </table:table>
      <text:p text:style-name="P1"/>
      <text:p text:style-name="P4">56:50</text:p>
      <text:p text:style-name="P4">four months <text:span text:style-name="T5">I quit cussing</text:span> because every <text:s/>time I would cuss it would remind me of <text:s text:c="2"/>that valley it would remind me of my mouth <text:s/>burning i didn't like the way that it made me</text:p>
      <text:p text:style-name="P4"/>
      <table:table table:name="Table1" table:style-name="Table1">
        <table:table-column table:style-name="Table1.A"/>
        <table:table-row>
          <table:table-cell table:style-name="Table1.A1" office:value-type="string">
            <text:p text:style-name="Table_20_Contents"><text:span text:style-name="T1">James 3:8</text:span><text:line-break/>But the tongue can no man tame; it is an unruly evil, full of deadly poison.</text:p>
          </table:table-cell>
        </table:table-row>
      </table:table>
      <text:p text:style-name="P4"/>
      <text:p text:style-name="P5">He mentions a “Lord” 7 times but he never calls Jesus Lord:</text:p>
      <table:table table:name="Table3" table:style-name="Table3">
        <table:table-column table:style-name="Table3.A"/>
        <table:table-row>
          <table:table-cell table:style-name="Table3.A1" office:value-type="string">
            <text:p text:style-name="P6">1 Corinthians 12:3</text:p>
            <text:p text:style-name="P7">Wherefore I give you to understand, that no man speaking by the Spirit of God calleth Jesus accursed: and that no man can say that Jesus is the Lord, but by the Holy Ghost.</text:p>
          </table:table-cell>
        </table:table-row>
      </table:table>
      <text:p text:style-name="P5"/>
      <text:p text:style-name="P5">He never calls Jesus Christ the son of God:</text:p>
      <table:table table:name="Table4" table:style-name="Table4">
        <table:table-column table:style-name="Table4.A"/>
        <table:table-row>
          <table:table-cell table:style-name="Table4.A1" office:value-type="string">
            <text:p text:style-name="P8">1 John 4:15</text:p>
            <text:p text:style-name="P9">Whosoever shall confess that Jesus is the Son of God, God dwelleth in him, and he in God.</text:p>
          </table:table-cell>
        </table:table-row>
      </table:table>
      <text:p text:style-name="P5"/>
      <text:p text:style-name="P10">His recommended prayer for someone that doesn’t know the Father, Jesus or the Holy Spirit:</text:p>
      <table:table table:name="Table2" table:style-name="Table2">
        <table:table-column table:style-name="Table2.A"/>
        <table:table-row>
          <table:table-cell table:style-name="Table2.A1" office:value-type="string">
            <text:p text:style-name="Table_20_Contents">1:21:22</text:p>
            <text:p text:style-name="Table_20_Contents">an opportunity use this as an opportunity to say <text:s/>"Man. Father I repent. jesus please <text:span text:style-name="T2">i know that you</text:span> <text:s/></text:p>
            <text:p text:style-name="Table_20_Contents">1:21:30</text:p>
            <text:p text:style-name="Table_20_Contents"><text:span text:style-name="T2">have washed me clean</text:span> i know that you were put upon <text:s/>the cross that you were buried and you rose again <text:s/></text:p>
            <text:p text:style-name="Table_20_Contents">1:21:39</text:p>
            <text:p text:style-name="Table_20_Contents">after three days that you came back to life and <text:span text:style-name="T2">I <text:s/>ask that you give me a new heart and a new spirit</text:span> <text:s/></text:p>
            <text:p text:style-name="Table_20_Contents">1:21:49</text:p>
            <text:p text:style-name="Table_20_Contents">take this stony heart out of me and put a <text:s/>new fleshly heart in me and fill me full of <text:s/></text:p>
            <text:p text:style-name="Table_20_Contents">1:21:54</text:p>
            <text:p text:style-name="Table_20_Contents">your spirit father I want to be Christ minded <text:s/>i want to be walking talking and living in the <text:s/></text:p>
            <text:p text:style-name="Table_20_Contents">1:22:00</text:p>
            <text:p text:style-name="Table_20_Contents">spirit i don't want to be in the old man doing <text:s/>things of my plan but I want to be in the new <text:s/></text:p>
            <text:p text:style-name="Table_20_Contents">1:22:05</text:p>
            <text:p text:style-name="Table_20_Contents">man and I want to do your plan Father brothers <text:s/>and sisters use this as an opportunity to come <text:s/></text:p>
            <text:p text:style-name="Table_20_Contents">1:22:11</text:p>
            <text:p text:style-name="Table_20_Contents">to Christ <text:span text:style-name="T6">i promise he will give you freedom</text:span><text:span text:style-name="T2"> <text:s/></text:span><text:span text:style-name="T7">he will give you light</text:span><text:span text:style-name="T2"> and </text:span><text:span text:style-name="T8">he will give you</text:span> <text:s/></text:p>
            <text:p text:style-name="Table_20_Contents">1:22:19</text:p>
            <text:p text:style-name="Table_20_Contents"><text:span text:style-name="T8">all the desires of your heart</text:span> brothers and <text:s/>sisters use this as an opportunity to get <text:s/></text:p>
            <text:p text:style-name="Table_20_Contents">1:22:24</text:p>
            <text:p text:style-name="Table_20_Contents">the new heart the new spirit because Jesus <text:s/>is real and he is here to set you free please</text:p>
            <text:p text:style-name="Table_20_Contents">1:22:32</text:p>
            <text:p text:style-name="Table_20_Contents">please dedicate your lives to Christ he's <text:s/>dedicated to you i promise he's dedicated to <text:s/></text:p>
          </table:table-cell>
        </table:table-row>
      </table:table>
      <text:p text:style-name="P10"/>
      <text:list text:style-name="L1">
        <text:list-item>
          <text:p text:style-name="P11">I promise he will give you freedom</text:p>
          <text:list>
            <text:list-item>
              <text:p text:style-name="P12"><text:soft-page-break/>pride of life</text:p>
            </text:list-item>
          </text:list>
        </text:list-item>
        <text:list-item>
          <text:p text:style-name="P11">He will give you light</text:p>
          <text:list>
            <text:list-item>
              <text:p text:style-name="P12">lust of the eyes</text:p>
            </text:list-item>
          </text:list>
        </text:list-item>
        <text:list-item>
          <text:p text:style-name="P11">He will give you all the desires of your heart</text:p>
          <text:list>
            <text:list-item>
              <text:p text:style-name="P11">lust of the flesh</text:p>
            </text:list-item>
          </text:list>
        </text:list-item>
      </text:list>
      <text:p text:style-name="P13"/>
      <table:table table:name="Table13" table:style-name="Table13">
        <table:table-column table:style-name="Table13.A"/>
        <table:table-row>
          <table:table-cell table:style-name="Table13.A1" office:value-type="string">
            <text:p text:style-name="Table_20_Contents">James 2:19<text:line-break/><text:span text:style-name="T4">19</text:span> Thou believest that there is one God; thou doest well: <text:span text:style-name="T2">the devils also believe</text:span>, and tremble.</text:p>
          </table:table-cell>
        </table:table-row>
      </table:table>
      <text:p text:style-name="P13"/>
      <table:table table:name="Table5" table:style-name="Table5">
        <table:table-column table:style-name="Table5.A"/>
        <table:table-row>
          <table:table-cell table:style-name="Table5.A1" office:value-type="string">
            <text:p text:style-name="Table_20_Contents">1:16:29</text:p>
            <text:p text:style-name="Table_20_Contents">the word people have asked me you know who do you <text:s/>think the man in the golden suit was you know they <text:s/></text:p>
            <text:p text:style-name="Table_20_Contents">1:16:36</text:p>
            <text:p text:style-name="Table_20_Contents">people ask you was it Jesus was it an angel and <text:s/>um there's one part in the Bible that that really <text:s/></text:p>
            <text:p text:style-name="Table_20_Contents">1:16:42</text:p>
            <text:p text:style-name="Table_20_Contents">just sticks out to me so much and it's <text:span text:style-name="T2">Ezekiel <text:s/>9</text:span> and I'm just paraphrasing um in Ezekiel 9 <text:s/></text:p>
            <text:p text:style-name="Table_20_Contents">1:16:50</text:p>
            <text:p text:style-name="Table_20_Contents">uh God's tripping they're at the temple and God's <text:s/>tripping he's pissed and he calls forth six men <text:s/></text:p>
            <text:p text:style-name="Table_20_Contents">1:16:58</text:p>
            <text:p text:style-name="Table_20_Contents">with <text:span text:style-name="T2">battle axes</text:span> and he calls forth the seventh <text:s/>man just dressed in linen and clothes regular <text:s/></text:p>
          </table:table-cell>
        </table:table-row>
      </table:table>
      <text:p text:style-name="P13"/>
      <text:p text:style-name="P14">The word “battle axe” (singular) appears only one time in the <text:span text:style-name="T9">King James </text:span>Bible and it is in <text:span text:style-name="T1">Jer</text:span><text:span text:style-name="T10">e</text:span><text:span text:style-name="T1">miah 51:20</text:span> <text:span text:style-name="T9">and it is not what Ken is referencing</text:span>:</text:p>
      <table:table table:name="Table6" table:style-name="Table6">
        <table:table-column table:style-name="Table6.A"/>
        <table:table-row>
          <table:table-cell table:style-name="Table6.A1" office:value-type="string">
            <text:p text:style-name="Table_20_Contents"><text:span text:style-name="T1">Jeremiah 51:20</text:span><text:line-break/>Thou art my battle axe and weapons of war:<text:line-break/>for with thee will I break in pieces the nations,<text:line-break/>and with thee will I destroy kingdoms;</text:p>
          </table:table-cell>
        </table:table-row>
      </table:table>
      <text:p text:style-name="P14"/>
      <text:p text:style-name="P15">The reason Ken mentions “battle axes” in <text:span text:style-name="T1">Ezekiel 9</text:span> is because in the Amplified and in the New King James perversions of the Bible <text:span text:style-name="T1">Ezekiel 9:2</text:span> “slaughter weapon” is mistranslated as “battle-axe”.</text:p>
      <text:p text:style-name="P15"/>
      <table:table table:name="Table7" table:style-name="Table7">
        <table:table-column table:style-name="Table7.A"/>
        <table:table-row>
          <table:table-cell table:style-name="Table7.A1" office:value-type="string">
            <text:p text:style-name="P16">1:23:34</text:p>
            <text:p text:style-name="P16">I would just pray that you would continue to <text:s/>pour your spirit upon the planet father pour</text:p>
            <text:p text:style-name="P16">1:23:39</text:p>
            <text:p text:style-name="P16">your spirit into every man woman and child on <text:s/>this planet Father <text:span text:style-name="T2">because we are all brothers <text:s text:c="2"/>and sisters</text:span><text:span text:style-name="T11">1</text:span> wake everybody up wake all our spirits <text:s/>up Father and let us no longer continue to live in</text:p>
            <text:p text:style-name="P16">1:23:51</text:p>
            <text:p text:style-name="P16">the flesh but to live in the spirit Father let <text:s/>us bask in your glory your love your peace your</text:p>
            <text:p text:style-name="P16">1:23:56</text:p>
            <text:p text:style-name="P16">joy Father and let us continue to love each <text:s/>other <text:span text:style-name="T2">the very same way you love us because</text:span></text:p>
            <text:p text:style-name="P16">1:24:03</text:p>
            <text:p text:style-name="P16"><text:span text:style-name="T2">we know that that that the way that you love <text:s/>us is eternally</text:span><text:span text:style-name="T11">2</text:span> it's <text:span text:style-name="T2">in Jesus name I pray</text:span><text:span text:style-name="T11">3</text:span> amen</text:p>
          </table:table-cell>
        </table:table-row>
      </table:table>
      <text:p text:style-name="P17"/>
      <text:p text:style-name="P18">1</text:p>
      <table:table table:name="Table8" table:style-name="Table8">
        <table:table-column table:style-name="Table8.A"/>
        <table:table-row>
          <table:table-cell table:style-name="Table8.A1" office:value-type="string">
            <text:p text:style-name="P19"><text:span text:style-name="T1">John 8:44</text:span><text:line-break/><text:span text:style-name="T12">Ye are of your father the devil, and the lusts of your father ye will do. He was a murderer from the beginning, and abode not in the truth, because there is no truth in him. When he speaketh a lie, he speaketh of his own: for he is a liar, and the father of it.</text:span></text:p>
            <text:p text:style-name="P20"/>
            <text:p text:style-name="P21">Mark 3:3<text:span text:style-name="T13">1</text:span>-35<text:line-break/><text:span text:style-name="T14">31</text:span><text:span text:style-name="T15"> There came then his brethren and his mother, and, standing without, sent unto him, calling him.</text:span></text:p>
            <text:p text:style-name="P20"><text:span text:style-name="T14">32</text:span><text:span text:style-name="T15"> And the multitude sat about him, and they said unto him, Behold, thy mother and thy brethren without seek for thee.</text:span><text:line-break/><text:span text:style-name="T14">3</text:span><text:span text:style-name="T16">3</text:span><text:span text:style-name="T17"> </text:span><text:span text:style-name="T15">And he answered them, saying, </text:span>Who is my mother, or my brethren?</text:p>
            <text:p text:style-name="P20"><text:span text:style-name="T14">34</text:span> And he looked round about on them which sat about him, and said, Behold my mother and my brethren!</text:p>
            <text:p text:style-name="P20"><text:soft-page-break/><text:span text:style-name="T14">35</text:span> For whosoever shall do the will of God, the same is my brother, and my sister, and mother.</text:p>
          </table:table-cell>
        </table:table-row>
      </table:table>
      <text:p text:style-name="P22"/>
      <text:p text:style-name="P22"/>
      <text:p text:style-name="P18">2</text:p>
      <table:table table:name="Table9" table:style-name="Table9">
        <table:table-column table:style-name="Table9.A"/>
        <table:table-row>
          <table:table-cell table:style-name="Table9.A1" office:value-type="string">
            <text:p text:style-name="Table_20_Contents"><text:span text:style-name="T1">John 3:36</text:span><text:line-break/>He that believeth on the Son hath everlasting life: and he that believeth not the Son shall not see life; but <text:span text:style-name="T2">the wrath of God abideth on him</text:span>.</text:p>
          </table:table-cell>
        </table:table-row>
      </table:table>
      <text:p text:style-name="P22"/>
      <text:p text:style-name="P18">3</text:p>
      <table:table table:name="Table12" table:style-name="Table12">
        <table:table-column table:style-name="Table12.A"/>
        <table:table-row>
          <table:table-cell table:style-name="Table12.A1" office:value-type="string">
            <text:p text:style-name="P23"><text:span text:style-name="T1">Acts 19:13-16</text:span><text:line-break/><text:span text:style-name="T4">13</text:span> Then certain of the vagabond Jews, exorcists, took upon them to call over them which had evil spirits the name of the Lord Jesus, saying, We adjure you by Jesus whom Paul preacheth.</text:p>
            <text:p text:style-name="P23"><text:span text:style-name="T4">14</text:span> And there were seven sons of one Sceva, a Jew, and chief of the priests, which did so.</text:p>
            <text:p text:style-name="P23"><text:span text:style-name="T4">15</text:span> And the evil spirit answered and said, Jesus I know, and Paul I know; but who are ye?</text:p>
            <text:p text:style-name="P23"><text:span text:style-name="T4">16</text:span> And the man in whom the evil spirit was leaped on them, and overcame them, and prevailed against them, so that they fled out of that house naked and wounded.</text:p>
          </table:table-cell>
        </table:table-row>
      </table:table>
      <text:p text:style-name="P22"/>
      <table:table table:name="Table14" table:style-name="Table14">
        <table:table-column table:style-name="Table14.A"/>
        <table:table-row>
          <table:table-cell table:style-name="Table14.A1" office:value-type="string">
            <text:p text:style-name="Table_20_Contents"><text:span text:style-name="T1">Acts 13:10</text:span><text:line-break/><text:span text:style-name="T4">10</text:span> And said, <text:span text:style-name="T2">O full of all subtilty and all mischief, thou child of the devil, thou enemy of all righteousness, wilt thou not cease to pervert the right ways of the Lord?</text:span></text:p>
          </table:table-cell>
        </table:table-row>
      </table:table>
      <text:p text:style-name="P2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in" fo:margin-bottom="0in" fo:margin-left="0.05in" fo:margin-right="0.0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9-01T19:02:49.403811200</meta:creation-date>
    <dc:title>default</dc:title>
    <meta:editing-duration>PT9H49M14S</meta:editing-duration>
    <meta:editing-cycles>47</meta:editing-cycles>
    <meta:generator>LibreOffice/26.2.4.2$Linux_X86_64 LibreOffice_project/64a984c51f4702dbd3710b13428c673a2f1292e7</meta:generator>
    <dc:date>2026-07-11T12:21:23.715704019</dc:date>
    <meta:document-statistic meta:table-count="14" meta:image-count="0" meta:object-count="0" meta:page-count="3" meta:paragraph-count="81" meta:word-count="1126" meta:character-count="5774" meta:non-whitespace-character-count="4677"/>
    <meta:template xlink:type="simple" xlink:actuate="onRequest" xlink:title="default" xlink:href="../../AppData/Roaming/LibreOffice/4/user/template/default.ott" meta:date="2025-09-01T19:02:48.661257700"/>
  </office:meta>
</office:document-meta>
</file>