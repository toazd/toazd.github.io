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6882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3pt" style:font-size-asian="13pt" style:font-size-complex="13pt"/>
    </style:style>
    <style:style style:name="ce6" style:family="table-cell" style:parent-style-name="Default">
      <style:table-cell-properties fo:border="0.74pt solid #000000"/>
      <style:text-properties style:font-name="Liberation Sans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8" table:default-cell-style-name="ce5"/>
        <table:table-row table:style-name="ro1">
          <table:table-cell table:style-name="ce1" office:value-type="string" calcext:value-type="string" table:number-columns-spanned="2" table:number-rows-spanned="1">
            <text:p>Month number*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Hebrew month</text:p>
          </table:table-cell>
          <table:table-cell table:style-name="ce7" office:value-type="string" calcext:value-type="string" table:number-columns-spanned="1" table:number-rows-spanned="2">
            <text:p>Length</text:p>
          </table:table-cell>
          <table:table-cell table:style-name="ce7" office:value-type="string" calcext:value-type="string" table:number-columns-spanned="1" table:number-rows-spanned="2">
            <text:p>Gregorian range for first day of month<text:a xlink:href="https://en.wikipedia.org/wiki/Hebrew_calendar#cite_note-17" xlink:type="simple">[c]</text:a></text:p>
          </table:table-cell>
          <table:table-cell table:style-name="ce7" office:value-type="string" calcext:value-type="string" table:number-columns-spanned="1" table:number-rows-spanned="2">
            <text:p>Range for last day of month </text:p>
          </table:table-cell>
          <table:table-cell table:number-columns-repeated="16378"/>
        </table:table-row>
        <table:table-row table:style-name="ro2">
          <table:table-cell table:style-name="ce1" office:value-type="string" calcext:value-type="string">
            <text:p>Ecclesiastical/</text:p>
            <text:p>Biblical</text:p>
          </table:table-cell>
          <table:table-cell table:style-name="ce7" office:value-type="string" calcext:value-type="string">
            <text:p>Civil </text:p>
          </table:table-cell>
          <table:covered-table-cell table:number-columns-repeated="4" table:style-name="ce6"/>
          <table:table-cell table:number-columns-repeated="1637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is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2 March to 11 April</text:p>
          </table:table-cell>
          <table:table-cell table:style-name="ce4" office:value-type="string" calcext:value-type="string">
            <text:p>10 April to 10 May </text:p>
          </table:table-cell>
          <table:table-cell table:number-columns-repeated="1637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Iyar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1 April to 11 May</text:p>
          </table:table-cell>
          <table:table-cell table:style-name="ce4" office:value-type="string" calcext:value-type="string">
            <text:p>9 May to 8 June </text:p>
          </table:table-cell>
          <table:table-cell table:number-columns-repeated="1637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iv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0 May to 9 June</text:p>
          </table:table-cell>
          <table:table-cell table:style-name="ce4" office:value-type="string" calcext:value-type="string">
            <text:p>8 June to 8 July </text:p>
          </table:table-cell>
          <table:table-cell table:number-columns-repeated="1637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Tammuz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9 June to 9 July</text:p>
          </table:table-cell>
          <table:table-cell table:style-name="ce4" office:value-type="string" calcext:value-type="string">
            <text:p>7 July to 6 August </text:p>
          </table:table-cell>
          <table:table-cell table:number-columns-repeated="1637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Av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8 July to 7 August</text:p>
          </table:table-cell>
          <table:table-cell table:style-name="ce4" office:value-type="string" calcext:value-type="string">
            <text:p>6 August to 5 September </text:p>
          </table:table-cell>
          <table:table-cell table:number-columns-repeated="1637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Elul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7 August to 6 September</text:p>
          </table:table-cell>
          <table:table-cell table:style-name="ce4" office:value-type="string" calcext:value-type="string">
            <text:p>4 September to 4 October </text:p>
          </table:table-cell>
          <table:table-cell table:number-columns-repeated="1637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ishrei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 September to 5 October</text:p>
          </table:table-cell>
          <table:table-cell table:style-name="ce4" office:value-type="string" calcext:value-type="string">
            <text:p>4 October to 3 November </text:p>
          </table:table-cell>
          <table:table-cell table:number-columns-repeated="1637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heshvan (or Marcheshvan)</text:p>
          </table:table-cell>
          <table:table-cell table:style-name="ce4" office:value-type="string" calcext:value-type="string">
            <text:p>29 (or 30)</text:p>
          </table:table-cell>
          <table:table-cell table:style-name="ce4" office:value-type="string" calcext:value-type="string">
            <text:p>5 October to 4 November</text:p>
          </table:table-cell>
          <table:table-cell table:style-name="ce4" office:value-type="string" calcext:value-type="string">
            <text:p>3 November to 2 December </text:p>
          </table:table-cell>
          <table:table-cell table:number-columns-repeated="1637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Kislev</text:p>
          </table:table-cell>
          <table:table-cell table:style-name="ce4" office:value-type="string" calcext:value-type="string">
            <text:p>30 (or 29)</text:p>
          </table:table-cell>
          <table:table-cell table:style-name="ce4" office:value-type="string" calcext:value-type="string">
            <text:p>4 November to 3 December</text:p>
          </table:table-cell>
          <table:table-cell table:style-name="ce4" office:value-type="string" calcext:value-type="string">
            <text:p>2 December to 31 December </text:p>
          </table:table-cell>
          <table:table-cell table:number-columns-repeated="1637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beth/Tevet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3 December to 1 January</text:p>
          </table:table-cell>
          <table:table-cell table:style-name="ce4" office:value-type="string" calcext:value-type="string">
            <text:p>31 December to 29 January </text:p>
          </table:table-cell>
          <table:table-cell table:number-columns-repeated="1637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Shevat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 January to 30 January</text:p>
          </table:table-cell>
          <table:table-cell table:style-name="ce4" office:value-type="string" calcext:value-type="string">
            <text:p>30 January to 28 February </text:p>
          </table:table-cell>
          <table:table-cell table:number-columns-repeated="1637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dar I (only in leap years)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31 January to 12 February</text:p>
          </table:table-cell>
          <table:table-cell table:style-name="ce4" office:value-type="string" calcext:value-type="string">
            <text:p>1 March to 12 March </text:p>
          </table:table-cell>
          <table:table-cell table:number-columns-repeated="1637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dar (Adar II in leap years)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1 February to 13 March</text:p>
          </table:table-cell>
          <table:table-cell table:style-name="ce4" office:value-type="string" calcext:value-type="string">
            <text:p>11 March to 10 April 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8:45:00.4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lliam K. McDannell</meta:initial-creator>
    <meta:creation-date>2024-03-20T13:33:06.086000000</meta:creation-date>
    <dc:date>2024-03-21T08:45:36.364000000</dc:date>
    <dc:creator>William K. McDannell</dc:creator>
    <meta:editing-duration>PT4M26S</meta:editing-duration>
    <meta:editing-cycles>3</meta:editing-cycles>
    <meta:generator>LibreOffice/7.6.5.2$Windows_X86_64 LibreOffice_project/38d5f62f85355c192ef5f1dd47c5c0c0c6d6598b</meta:generator>
    <meta:document-statistic meta:table-count="1" meta:cell-count="85" meta:object-count="0"/>
  </office:meta>
</office:document-meta>
</file>