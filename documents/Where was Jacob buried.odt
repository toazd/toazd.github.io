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7.5in" style:rel-column-width="65535*"/>
    </style:style>
    <style:style style:name="Table1.A1" style:family="table-cell">
      <style:table-cell-properties fo:padding="0.0382in" fo:border="0.5pt solid #000000"/>
    </style:style>
    <style:style style:name="Table8" style:family="table">
      <style:table-properties style:width="7.5in" table:align="margins"/>
    </style:style>
    <style:style style:name="Table8.A" style:family="table-column">
      <style:table-column-properties style:column-width="7.5in" style:rel-column-width="65535*"/>
    </style:style>
    <style:style style:name="Table8.A1" style:family="table-cell">
      <style:table-cell-properties fo:padding="0.0382in" fo:border="0.5pt solid #000000"/>
    </style:style>
    <style:style style:name="Table2" style:family="table">
      <style:table-properties style:width="7.5in" table:align="margins"/>
    </style:style>
    <style:style style:name="Table2.A" style:family="table-column">
      <style:table-column-properties style:column-width="7.5in" style:rel-column-width="65535*"/>
    </style:style>
    <style:style style:name="Table2.A1" style:family="table-cell">
      <style:table-cell-properties fo:padding="0.0382in" fo:border="0.5pt solid #000000"/>
    </style:style>
    <style:style style:name="P1" style:family="paragraph" style:parent-style-name="Text_20_body">
      <style:text-properties style:font-name="Liberation Sans" fo:font-size="12pt" officeooo:rsid="002fe2e2" officeooo:paragraph-rsid="002fe2e2" style:font-size-asian="12pt" style:font-size-complex="12pt"/>
    </style:style>
    <style:style style:name="P2" style:family="paragraph" style:parent-style-name="Table_20_Contents">
      <style:paragraph-properties fo:text-align="left" style:justify-single-word="false"/>
      <style:text-properties style:font-name="Liberation Sans" fo:font-size="12pt" officeooo:paragraph-rsid="002067cd" style:font-size-asian="12pt" style:font-name-complex="Liberation Sans" style:font-size-complex="12pt"/>
    </style:style>
    <style:style style:name="P3" style:family="paragraph" style:parent-style-name="Standard" style:list-style-name="L1">
      <style:text-properties style:font-name="Liberation Sans" fo:font-size="12pt" officeooo:rsid="002bbc18" officeooo:paragraph-rsid="002bbc18" style:font-size-asian="12pt" style:font-size-complex="12pt"/>
    </style:style>
    <style:style style:name="P4" style:family="paragraph" style:parent-style-name="Standard" style:list-style-name="L1">
      <style:text-properties style:font-name="Liberation Sans" fo:font-size="12pt" officeooo:rsid="005045aa" officeooo:paragraph-rsid="005045aa" style:font-size-asian="12pt" style:font-size-complex="12pt"/>
    </style:style>
    <style:style style:name="P5" style:family="paragraph" style:parent-style-name="Standard" style:list-style-name="L1">
      <style:text-properties style:font-name="Liberation Sans" fo:font-size="12pt" officeooo:paragraph-rsid="00574571" style:font-size-asian="12pt" style:font-size-complex="12pt"/>
    </style:style>
    <style:style style:name="P6" style:family="paragraph" style:parent-style-name="Standard">
      <style:text-properties style:font-name="Liberation Sans" fo:font-size="12pt" style:font-size-asian="12pt" style:font-size-complex="12pt"/>
    </style:style>
    <style:style style:name="P7" style:family="paragraph" style:parent-style-name="Table_20_Contents">
      <style:text-properties style:font-name="Liberation Sans" fo:font-size="12pt" officeooo:paragraph-rsid="0023bfcb" style:font-size-asian="12pt" style:font-name-complex="Liberation Sans" style:font-size-complex="12pt"/>
    </style:style>
    <style:style style:name="P8" style:family="paragraph" style:parent-style-name="Standard" style:list-style-name="L2">
      <style:text-properties style:font-name="Liberation Sans" fo:font-size="12pt" officeooo:rsid="0025b576" officeooo:paragraph-rsid="002a0862" style:font-size-asian="12pt" style:font-size-complex="12pt"/>
    </style:style>
    <style:style style:name="P9" style:family="paragraph" style:parent-style-name="Standard" style:list-style-name="L2">
      <style:text-properties style:font-name="Liberation Sans" fo:font-size="12pt" style:font-size-asian="12pt" style:font-size-complex="12pt"/>
    </style:style>
    <style:style style:name="P10" style:family="paragraph" style:parent-style-name="Table_20_Contents">
      <style:text-properties style:use-window-font-color="true" loext:opacity="0%" style:font-name="Liberation Sans" fo:font-size="12pt" officeooo:paragraph-rsid="0021f477" style:font-size-asian="12pt" style:font-size-complex="12pt"/>
    </style:style>
    <style:style style:name="P11" style:family="paragraph" style:parent-style-name="Table_20_Contents">
      <style:text-properties fo:color="#127622" loext:opacity="100%" style:font-name="Liberation Sans" fo:font-size="12pt" officeooo:paragraph-rsid="0021f477" style:font-size-asian="12pt" style:font-size-complex="12pt"/>
    </style:style>
    <style:style style:name="P12" style:family="paragraph" style:parent-style-name="Table_20_Contents">
      <style:text-properties style:font-name="Liberation Sans" fo:font-size="12pt" style:font-size-asian="12pt" style:font-size-complex="12pt"/>
    </style:style>
    <style:style style:name="P13" style:family="paragraph" style:parent-style-name="Standard" style:list-style-name="L3">
      <style:text-properties style:font-name="Liberation Sans" fo:font-size="12pt" officeooo:paragraph-rsid="003a1948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04af6cb" style:font-size-asian="12pt" style:font-size-complex="12pt"/>
    </style:style>
    <style:style style:name="P15" style:family="paragraph" style:parent-style-name="Standard">
      <style:text-properties style:font-name="Liberation Sans" fo:font-size="12pt" officeooo:rsid="004af6cb" officeooo:paragraph-rsid="004af6cb" style:font-size-asian="12pt" style:font-size-complex="12pt"/>
    </style:style>
    <style:style style:name="P16" style:family="paragraph" style:parent-style-name="Standard">
      <style:text-properties style:font-name="Liberation Sans" fo:font-size="12pt" officeooo:rsid="00425eec" officeooo:paragraph-rsid="00425eec" style:font-size-asian="12pt" style:font-size-complex="12pt"/>
    </style:style>
    <style:style style:name="P17" style:family="paragraph" style:parent-style-name="Standard">
      <style:text-properties style:font-name="Liberation Sans" fo:font-size="12pt" officeooo:rsid="00446431" officeooo:paragraph-rsid="00446431" style:font-size-asian="12pt" style:font-size-complex="12pt"/>
    </style:style>
    <style:style style:name="P18" style:family="paragraph" style:parent-style-name="Standard">
      <style:text-properties style:font-name="Liberation Sans" fo:font-size="12pt" officeooo:rsid="0045f577" officeooo:paragraph-rsid="0045f577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045fce0" style:font-size-asian="12pt" style:font-size-complex="12pt"/>
    </style:style>
    <style:style style:name="P20" style:family="paragraph" style:parent-style-name="Standard">
      <style:text-properties style:font-name="Liberation Sans" fo:font-size="12pt" officeooo:rsid="004c05c2" officeooo:paragraph-rsid="004de037" style:font-size-asian="12pt" style:font-size-complex="12pt"/>
    </style:style>
    <style:style style:name="P21" style:family="paragraph" style:parent-style-name="Standard">
      <style:text-properties style:font-name="Liberation Sans" fo:font-size="12pt" fo:font-weight="normal" officeooo:rsid="00484212" style:font-size-asian="12pt" style:font-weight-asian="normal" style:font-name-complex="Liberation Sans" style:font-size-complex="12pt" style:font-weight-complex="normal"/>
    </style:style>
    <style:style style:name="T1" style:family="text">
      <style:text-properties fo:color="#127622" loext:opacity="100%"/>
    </style:style>
    <style:style style:name="T2" style:family="text">
      <style:text-properties style:text-position="33% 80%"/>
    </style:style>
    <style:style style:name="T3" style:family="text">
      <style:text-properties style:text-position="super 58%" officeooo:rsid="001b168f"/>
    </style:style>
    <style:style style:name="T4" style:family="text">
      <style:text-properties style:text-position="super 58%" officeooo:rsid="0028e5db"/>
    </style:style>
    <style:style style:name="T5" style:family="text">
      <style:text-properties style:text-position="super 58%" officeooo:rsid="00393744"/>
    </style:style>
    <style:style style:name="T6" style:family="text">
      <style:text-properties style:text-position="super 58%" officeooo:rsid="0039fb36"/>
    </style:style>
    <style:style style:name="T7" style:family="text">
      <style:text-properties fo:font-style="italic"/>
    </style:style>
    <style:style style:name="T8" style:family="text">
      <style:text-properties style:text-position="super 58%" officeooo:rsid="002da6c2"/>
    </style:style>
    <style:style style:name="T9" style:family="text">
      <style:text-properties officeooo:rsid="002da6c2"/>
    </style:style>
    <style:style style:name="T10" style:family="text">
      <style:text-properties officeooo:rsid="00514e81"/>
    </style:style>
    <style:style style:name="T11" style:family="text">
      <style:text-properties officeooo:rsid="00328b93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2da6c2" style:font-style-asian="normal" style:font-style-complex="normal"/>
    </style:style>
    <style:style style:name="T15" style:family="text">
      <style:text-properties fo:font-style="normal" officeooo:rsid="0055f5c4" style:font-style-asian="normal" style:font-style-complex="normal"/>
    </style:style>
    <style:style style:name="T16" style:family="text">
      <style:text-properties fo:color="#127622" loext:opacity="100%" fo:font-style="normal" officeooo:rsid="002da6c2" style:font-style-asian="normal" style:font-style-complex="normal"/>
    </style:style>
    <style:style style:name="T17" style:family="text">
      <style:text-properties fo:font-style="normal" officeooo:rsid="00485561" style:font-style-asian="normal" style:font-style-complex="normal"/>
    </style:style>
    <style:style style:name="T18" style:family="text">
      <style:text-properties fo:font-style="normal" officeooo:rsid="002ef37a" style:font-style-asian="normal" style:font-style-complex="normal"/>
    </style:style>
    <style:style style:name="T19" style:family="text">
      <style:text-properties fo:font-style="normal" officeooo:rsid="00314298" style:font-style-asian="normal" style:font-style-complex="normal"/>
    </style:style>
    <style:style style:name="T20" style:family="text">
      <style:text-properties fo:color="#127622" loext:opacity="100%" fo:font-style="normal" officeooo:rsid="00314298" style:font-style-asian="normal" style:font-style-complex="normal"/>
    </style:style>
    <style:style style:name="T21" style:family="text">
      <style:text-properties fo:font-style="normal" officeooo:rsid="00514e81" style:font-style-asian="normal" style:font-style-complex="normal"/>
    </style:style>
    <style:style style:name="T22" style:family="text">
      <style:text-properties fo:font-style="normal" officeooo:rsid="005669a8" style:font-style-asian="normal" style:font-style-complex="normal"/>
    </style:style>
    <style:style style:name="T23" style:family="text">
      <style:text-properties fo:font-style="normal" officeooo:rsid="0053439f" style:font-style-asian="normal" style:font-style-complex="normal"/>
    </style:style>
    <style:style style:name="T24" style:family="text">
      <style:text-properties fo:font-style="normal" officeooo:rsid="003a1948" style:font-style-asian="normal" style:font-style-complex="normal"/>
    </style:style>
    <style:style style:name="T25" style:family="text">
      <style:text-properties fo:font-style="normal" officeooo:rsid="00401da1" fo:background-color="transparent" loext:char-shading-value="0" style:font-style-asian="normal" style:font-style-complex="normal"/>
    </style:style>
    <style:style style:name="T26" style:family="text">
      <style:text-properties fo:font-style="normal" officeooo:rsid="00574571" fo:background-color="transparent" loext:char-shading-value="0" style:font-style-asian="normal" style:font-style-complex="normal"/>
    </style:style>
    <style:style style:name="T27" style:family="text">
      <style:text-properties fo:font-style="normal" officeooo:rsid="00587413" fo:background-color="transparent" loext:char-shading-value="0" style:font-style-asian="normal" style:font-style-complex="normal"/>
    </style:style>
    <style:style style:name="T28" style:family="text">
      <style:text-properties officeooo:rsid="0055e376"/>
    </style:style>
    <style:style style:name="T29" style:family="text">
      <style:text-properties officeooo:rsid="003788de"/>
    </style:style>
    <style:style style:name="T30" style:family="text">
      <style:text-properties fo:color="#127622" loext:opacity="100%" officeooo:rsid="0023bfcb"/>
    </style:style>
    <style:style style:name="T31" style:family="text">
      <style:text-properties officeooo:rsid="0023bfcb"/>
    </style:style>
    <style:style style:name="T32" style:family="text">
      <style:text-properties officeooo:rsid="003fba7a"/>
    </style:style>
    <style:style style:name="T33" style:family="text">
      <style:text-properties style:text-position="33% 80%" officeooo:rsid="0023bfcb"/>
    </style:style>
    <style:style style:name="T34" style:family="text">
      <style:text-properties officeooo:rsid="0023bfcb" fo:background-color="#ffff00" loext:char-shading-value="0"/>
    </style:style>
    <style:style style:name="T35" style:family="text">
      <style:text-properties fo:font-style="italic" officeooo:rsid="0023bfcb"/>
    </style:style>
    <style:style style:name="T36" style:family="text">
      <style:text-properties officeooo:rsid="003a1948"/>
    </style:style>
    <style:style style:name="T37" style:family="text">
      <style:text-properties officeooo:rsid="00401da1" fo:background-color="transparent" loext:char-shading-value="0"/>
    </style:style>
    <style:style style:name="T38" style:family="text">
      <style:text-properties officeooo:rsid="004af6cb"/>
    </style:style>
    <style:style style:name="T39" style:family="text">
      <style:text-properties officeooo:rsid="0045345e"/>
    </style:style>
    <style:style style:name="T40" style:family="text">
      <style:text-properties officeooo:rsid="00445117"/>
    </style:style>
    <style:style style:name="T41" style:family="text">
      <style:text-properties officeooo:rsid="0045fce0"/>
    </style:style>
    <style:style style:name="T42" style:family="text">
      <style:text-properties fo:color="#127622" loext:opacity="100%" officeooo:rsid="0045fce0"/>
    </style:style>
    <style:style style:name="T43" style:family="text">
      <style:text-properties officeooo:rsid="0047930e"/>
    </style:style>
    <style:style style:name="T44" style:family="text">
      <style:text-properties officeooo:rsid="0047d355"/>
    </style:style>
    <style:style style:name="T45" style:family="text">
      <style:text-properties fo:color="#127622" loext:opacity="100%" officeooo:rsid="0047d355"/>
    </style:style>
    <style:style style:name="T46" style:family="text">
      <style:text-properties officeooo:rsid="00481dd1"/>
    </style:style>
    <style:style style:name="T47" style:family="text">
      <style:text-properties officeooo:rsid="0049f34a"/>
    </style:style>
    <style:style style:name="T48" style:family="text">
      <style:text-properties officeooo:rsid="00450e29"/>
    </style:style>
    <style:style style:name="T49" style:family="text">
      <style:text-properties fo:color="#127622" loext:opacity="100%" officeooo:rsid="00450e29"/>
    </style:style>
    <style:style style:name="T50" style:family="text">
      <style:text-properties officeooo:rsid="004e31f7"/>
    </style:style>
    <style:style style:name="T51" style:family="text">
      <style:text-properties officeooo:rsid="005b2b4d"/>
    </style:style>
    <style:style style:name="T52" style:family="text">
      <style:text-properties officeooo:rsid="004eb73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as Jacob buried in the city of Shechem/Sychem or somewhere else?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span text:style-name="T1">Acts 7:15-16</text:span><text:line-break/><text:span text:style-name="T2">15</text:span> So Jacob went down into Egypt, and died, he, and our fathers, <text:line-break/><text:span text:style-name="T2">16</text:span> And were carried over into Sychem<text:span text:style-name="T3">G4966 </text:span><text:span text:style-name="T4">(H7927)</text:span>, and laid in the sepulchre that Abraham bought for a sum of money of the sons of Emmor<text:span text:style-name="T5">G1697 </text:span><text:span text:style-name="T6">(H2544)</text:span> <text:span text:style-name="T7">the father</text:span> of Sychem<text:span text:style-name="T8">G4966</text:span>.</text:p>
          </table:table-cell>
        </table:table-row>
      </table:table>
      <text:list text:style-name="L1">
        <text:list-item>
          <text:p text:style-name="P3"><text:span text:style-name="T9">The first mention of </text:span>Sychem <text:span text:style-name="T10">(</text:span><text:span text:style-name="T11">Shechem</text:span><text:span text:style-name="T10">)</text:span> here refers to the <text:span text:style-name="T12">country</text:span><text:span text:style-name="T13"> of </text:span><text:span text:style-name="T14">which </text:span><text:span text:style-name="T15">the man </text:span><text:span text:style-name="T13">Shechem </text:span><text:span text:style-name="T14">was prince of (</text:span><text:span text:style-name="T16">Gen 34:2</text:span><text:span text:style-name="T14">) </text:span><text:span text:style-name="T13">which included </text:span><text:span text:style-name="T17">at least </text:span><text:span text:style-name="T13">the region</text:span><text:span text:style-name="T18">s</text:span><text:span text:style-name="T13"> </text:span><text:span text:style-name="T18">which would later be called</text:span><text:span text:style-name="T13"> Jerusalem </text:span><text:span text:style-name="T14">(</text:span><text:span text:style-name="T16">Gen 33:18</text:span><text:span text:style-name="T14">) </text:span><text:span text:style-name="T13">and Hebron </text:span><text:span text:style-name="T19">(</text:span><text:span text:style-name="T20">Gen 23:19</text:span><text:span text:style-name="T19">, </text:span><text:span text:style-name="T20">49:29,30</text:span><text:span text:style-name="T19">, </text:span><text:span text:style-name="T20">50:13</text:span><text:span text:style-name="T19">).</text:span></text:p>
        </text:list-item>
        <text:list-item>
          <text:p text:style-name="P4"><text:span text:style-name="T19">W</text:span><text:span text:style-name="T13">e know this isn’t referring to the </text:span><text:span text:style-name="T12">city</text:span><text:span text:style-name="T13"> of Shechem because </text:span><text:span text:style-name="T21">the sepulchre </text:span><text:span text:style-name="T22">(and field) </text:span><text:span text:style-name="T21">that Abraham bought from the sons of Emmor (Hamor) </text:span><text:span text:style-name="T23">is</text:span><text:span text:style-name="T21"> roughly 48.7 miles south/south-west of the city of Shechem in Hebron.</text:span></text:p>
        </text:list-item>
        <text:list-item>
          <text:p text:style-name="P5"><text:span text:style-name="T24">Jacob, </text:span><text:span text:style-name="T25">Abraham, Sarah, Isaac, Rebekah, and Leah </text:span><text:span text:style-name="T26">were all buried in that same cave </text:span><text:span text:style-name="T27">(</text:span><text:span text:style-name="T26">sepulchre</text:span><text:span text:style-name="T27">)</text:span><text:span text:style-name="T26">.</text:span></text:p>
        </text:list-item>
      </text:list>
      <text:p text:style-name="P6"/>
      <table:table table:name="Table8" table:style-name="Table8">
        <table:table-column table:style-name="Table8.A"/>
        <table:table-row>
          <table:table-cell table:style-name="Table8.A1" office:value-type="string">
            <text:p text:style-name="P7"><text:span text:style-name="T1">Genesis 23:1-2</text:span><text:line-break/><text:span text:style-name="T2">1</text:span> And Sarah was an hundred and seven and twenty years old: <text:span text:style-name="T7">these were</text:span> the years of the life of Sarah.<text:line-break/><text:span text:style-name="T2">2</text:span> And Sarah died in Kirjath-arba; the same <text:span text:style-name="T7">is</text:span> Hebron in the land of Canaan: and Abraham came to mourn for Sarah, and to weep for her.</text:p>
            <text:p text:style-name="P7"><text:line-break/><text:span text:style-name="T1">Genesis 23:17-19</text:span><text:line-break/><text:span text:style-name="T2">17</text:span> And the field of Ephron, which <text:span text:style-name="T7">was</text:span> in Machpelah, which <text:span text:style-name="T7">was</text:span> before Mamre, the field, and the cave which <text:span text:style-name="T7">was</text:span> therein, and all the trees that <text:span text:style-name="T7">were</text:span> in the field, that <text:span text:style-name="T7">were</text:span> in all the borders round about, were made sure<text:line-break/><text:span text:style-name="T2">18</text:span> Unto Abraham for a possession in the presence of the children of Heth, before all that went in at the gate of his city.<text:line-break/><text:span text:style-name="T2">19</text:span> And after this, Abraham buried Sarah his wife in the cave of the field of Machpelah before Mamre: the same <text:span text:style-name="T7">is</text:span> Hebron in the land of Canaan.</text:p>
          </table:table-cell>
        </table:table-row>
      </table:table>
      <text:list text:style-name="L2">
        <text:list-item>
          <text:p text:style-name="P8">Abraham buys a cave and a field from Ephron the Hittit<text:span text:style-name="T28">e.</text:span></text:p>
        </text:list-item>
        <text:list-item>
          <text:p text:style-name="P9">37 years after bringing forth Isaac, Sarah dies <text:span text:style-name="T29">and is buried in Hebron.</text:span></text:p>
        </text:list-item>
      </text:list>
      <text:p text:style-name="P6"/>
      <table:table table:name="Table2" table:style-name="Table2">
        <table:table-column table:style-name="Table2.A"/>
        <table:table-row>
          <table:table-cell table:style-name="Table2.A1" office:value-type="string">
            <text:p text:style-name="P10"><text:span text:style-name="T30">Genesis 49:29-32</text:span><text:span text:style-name="T31"> </text:span><text:span text:style-name="T32">(Jacob speaking to his children)</text:span><text:span text:style-name="T31"><text:line-break/></text:span><text:span text:style-name="T33">29</text:span><text:span text:style-name="T31"> And he charged them, and said unto them, I am to be gathered unto my people: bury me with my </text:span><text:span text:style-name="T34">fathers</text:span><text:span text:style-name="T31"> in the cave that </text:span><text:span text:style-name="T35">is</text:span><text:span text:style-name="T31"> in the field of Ephron the Hittite, <text:line-break/></text:span><text:span text:style-name="T33">30</text:span><text:span text:style-name="T31"> In the cave that </text:span><text:span text:style-name="T35">is</text:span><text:span text:style-name="T31"> in the field of Machpelah, which </text:span><text:span text:style-name="T35">is</text:span><text:span text:style-name="T31"> before Mamre, in the land of Canaan, which Abraham bought with the field of Ephron the Hittite for a possession of a buryingplace. <text:line-break/></text:span><text:span text:style-name="T33">31</text:span><text:span text:style-name="T31"> There they buried Abraham and Sarah his wife; there they buried Isaac and Rebekah his wife; and there I buried Leah. <text:line-break/></text:span><text:span text:style-name="T33">32</text:span><text:span text:style-name="T31"> The purchase of the field and of the cave that </text:span><text:span text:style-name="T35">is</text:span><text:span text:style-name="T31"> therein </text:span><text:span text:style-name="T35">was</text:span><text:span text:style-name="T31"> from the children of Heth.</text:span></text:p>
            <text:p text:style-name="P11"/>
            <text:p text:style-name="P11">Genesis 50:13</text:p>
            <text:p text:style-name="P12">For his sons carried him into the land of Canaan, and buried him in the cave of the field of Machpelah, which Abraham bought with the field for a possession of a buryingplace of Ephron the Hittite, before Mamre.</text:p>
          </table:table-cell>
        </table:table-row>
      </table:table>
      <text:list text:style-name="L3">
        <text:list-item>
          <text:p text:style-name="P13"><text:span text:style-name="T36">After dying in Egypt, Jacob is buried in Hebron </text:span><text:span text:style-name="T37">in the same cave as Abraham, Sarah, Isaac, Rebekah, and Leah.</text:span></text:p>
        </text:list-item>
      </text:list>
      <text:p text:style-name="P6"/>
      <text:p text:style-name="P6"/>
      <text:p text:style-name="P14"><text:soft-page-break/><text:span text:style-name="T38">Extra notes</text:span></text:p>
      <text:p text:style-name="P15"/>
      <text:p text:style-name="P16">That same cave is referred to as being bought <text:span text:style-name="T12">from</text:span>:</text:p>
      <text:p text:style-name="P16">“<text:span text:style-name="T39">the </text:span>sons of Emmor/Hamor”</text:p>
      <text:p text:style-name="P16">“<text:span text:style-name="T40">the children of Heth”</text:span></text:p>
      <text:p text:style-name="P16"/>
      <text:p text:style-name="P17">The field is referred to as:</text:p>
      <text:p text:style-name="P17">“the field of Ephron the Hittite”</text:p>
      <text:p text:style-name="P18">Ephron dwelt among the children of Heth (<text:span text:style-name="T1">Gen 23:10</text:span>).</text:p>
      <text:p text:style-name="P18"/>
      <text:p text:style-name="P19"><text:span text:style-name="T41">Both the field and the cave were the possession of Ephron (</text:span><text:span text:style-name="T42">Gen 23:9</text:span><text:span text:style-name="T41">) and initially Abraham requests only the cave. </text:span><text:span text:style-name="T43">Ephron offers the field as well as the cave </text:span><text:span text:style-name="T44">for free (</text:span><text:span text:style-name="T45">Gen 23:11</text:span><text:span text:style-name="T44">). </text:span><text:span text:style-name="T46">Abraham accepts both the cave and the field offer and pays for both of them. </text:span><text:span text:style-name="T47">Abraham pays 400 shekels of silver </text:span><text:span text:style-name="T48">to Ephron the Hittite </text:span><text:span text:style-name="T47">for the cave and the field </text:span><text:span text:style-name="T48">(</text:span><text:span text:style-name="T49">Gen 23:16</text:span><text:span text:style-name="T48">).</text:span></text:p>
      <text:p text:style-name="P6"/>
      <text:p text:style-name="P20"><text:span text:style-name="T50">That means that</text:span> Ephron the Hittite <text:span text:style-name="T51">is</text:span><text:span text:style-name="T52"> a </text:span>descendant of both Hamor and Heth.</text:p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9-09T13:49:06.158000000</meta:creation-date>
    <dc:date>2026-07-11T12:30:42.409110560</dc:date>
    <meta:editing-duration>PT1H39M29S</meta:editing-duration>
    <meta:editing-cycles>63</meta:editing-cycles>
    <meta:generator>LibreOffice/26.2.4.2$Linux_X86_64 LibreOffice_project/64a984c51f4702dbd3710b13428c673a2f1292e7</meta:generator>
    <dc:title>Where was Jacob buried?</dc:title>
    <meta:document-statistic meta:table-count="3" meta:image-count="0" meta:object-count="0" meta:page-count="2" meta:paragraph-count="22" meta:word-count="626" meta:character-count="3346" meta:non-whitespace-character-count="2743"/>
  </office:meta>
</office:document-meta>
</file>