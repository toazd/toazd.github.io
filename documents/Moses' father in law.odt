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2in" table:align="margins"/>
    </style:style>
    <style:style style:name="Table1.A" style:family="table-column">
      <style:table-column-properties style:column-width="8.2in" style:rel-column-width="65535*"/>
    </style:style>
    <style:style style:name="Table1.A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8.2in" table:align="margins"/>
    </style:style>
    <style:style style:name="Table2.A" style:family="table-column">
      <style:table-column-properties style:column-width="8.2in" style:rel-column-width="65535*"/>
    </style:style>
    <style:style style:name="Table2.A1" style:family="table-cell">
      <style:table-cell-properties fo:padding="0.0382in" fo:border="0.5pt solid #000000"/>
    </style:style>
    <style:style style:name="Table3" style:family="table">
      <style:table-properties style:width="8.2in" table:align="margins"/>
    </style:style>
    <style:style style:name="Table3.A" style:family="table-column">
      <style:table-column-properties style:column-width="8.2in" style:rel-column-width="65535*"/>
    </style:style>
    <style:style style:name="Table3.A1" style:family="table-cell">
      <style:table-cell-properties fo:padding="0.0382in" fo:border="0.5pt solid #000000"/>
    </style:style>
    <style:style style:name="P1" style:family="paragraph" style:parent-style-name="Table_20_Contents">
      <style:text-properties officeooo:paragraph-rsid="001a9f6a"/>
    </style:style>
    <style:style style:name="P2" style:family="paragraph" style:parent-style-name="Table_20_Contents">
      <style:text-properties fo:color="#127622" loext:opacity="100%" officeooo:paragraph-rsid="001a9f6a"/>
    </style:style>
    <style:style style:name="P3" style:family="paragraph" style:parent-style-name="Table_20_Contents">
      <style:text-properties fo:color="#127622" loext:opacity="100%" officeooo:paragraph-rsid="001c6959"/>
    </style:style>
    <style:style style:name="P4" style:family="paragraph" style:parent-style-name="Table_20_Contents" style:list-style-name="L1">
      <style:text-properties officeooo:rsid="001dc704" officeooo:paragraph-rsid="001dc704"/>
    </style:style>
    <style:style style:name="P5" style:family="paragraph" style:parent-style-name="Standard">
      <style:text-properties officeooo:paragraph-rsid="001a9f6a"/>
    </style:style>
    <style:style style:name="P6" style:family="paragraph" style:parent-style-name="Table_20_Contents">
      <style:text-properties fo:color="#127622" loext:opacity="100%" officeooo:paragraph-rsid="001b9870"/>
    </style:style>
    <style:style style:name="P7" style:family="paragraph" style:parent-style-name="Table_20_Contents">
      <style:text-properties officeooo:paragraph-rsid="001b9870"/>
    </style:style>
    <style:style style:name="T1" style:family="text">
      <style:text-properties fo:color="#127622" loext:opacity="100%"/>
    </style:style>
    <style:style style:name="T2" style:family="text">
      <style:text-properties style:use-window-font-color="true" loext:opacity="0%"/>
    </style:style>
    <style:style style:name="T3" style:family="text">
      <style:text-properties style:use-window-font-color="true" loext:opacity="0%" fo:font-size="10pt" officeooo:rsid="00835f4d" style:font-size-asian="10pt" style:font-size-complex="10pt"/>
    </style:style>
    <style:style style:name="T4" style:family="text">
      <style:text-properties style:use-window-font-color="true" loext:opacity="0%" fo:font-size="10pt" officeooo:rsid="003e40ba" style:font-size-asian="10pt" style:font-size-complex="10pt"/>
    </style:style>
    <style:style style:name="T5" style:family="text">
      <style:text-properties style:text-position="33% 80%"/>
    </style:style>
    <style:style style:name="T6" style:family="text">
      <style:text-properties fo:background-color="#ffff00" loext:char-shading-value="0"/>
    </style:style>
    <style:style style:name="T7" style:family="text">
      <style:text-properties fo:font-style="italic"/>
    </style:style>
    <style:style style:name="T8" style:family="text">
      <style:text-properties fo:background-color="#ffaa95" loext:char-shading-value="0"/>
    </style:style>
    <style:style style:name="T9" style:family="text">
      <style:text-properties style:text-position="super 58%" fo:background-color="transparent" loext:char-shading-value="0"/>
    </style:style>
    <style:style style:name="T10" style:family="text">
      <style:text-properties style:text-position="super 58%" officeooo:rsid="001c6959" fo:background-color="transparent" loext:char-shading-value="0"/>
    </style:style>
    <style:style style:name="T11" style:family="text">
      <style:text-properties officeooo:rsid="00a67545"/>
    </style:style>
    <style:style style:name="T12" style:family="text">
      <style:text-properties officeooo:rsid="002070e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"><text:span text:style-name="T1">Exodus 2:14-22</text:span><text:span text:style-name="T2"> </text:span><text:span text:style-name="T3">(</text:span><text:span text:style-name="T4">Moses’ age: 40-80</text:span><text:span text:style-name="T3">)</text:span><text:line-break/><text:span text:style-name="T5">14</text:span> And he said, Who made thee a prince and a judge over us? intendest thou to kill me, as thou killedst the Egyptian? And Moses feared, and said, Surely this thing is known.<text:line-break/><text:span text:style-name="T5">15</text:span> Now when Pharaoh heard this thing, he sought to slay Moses. But Moses fled from the face of Pharaoh, and dwelt in the <text:span text:style-name="T6">land of Midian</text:span>: and he sat down by a well.<text:line-break/><text:span text:style-name="T5">16</text:span> Now the <text:span text:style-name="T6">priest</text:span> of Midian had seven daughters: and they came and drew <text:span text:style-name="T7">water</text:span>, and filled the troughs to water their father's flock.<text:line-break/><text:span text:style-name="T5">17</text:span> And <text:span text:style-name="T6">the shepherds came and drove them away</text:span>: but <text:span text:style-name="T6">Moses stood up and helped them</text:span>, and watered their flock.<text:line-break/><text:span text:style-name="T5">18</text:span> And when they came to <text:span text:style-name="T8">Reuel</text:span> their father, he said, How <text:span text:style-name="T7">is it that</text:span> ye are come so soon to day?<text:line-break/><text:span text:style-name="T5">19</text:span> And they said, <text:span text:style-name="T6">An Egyptian delivered us out of the hand of the shepherds</text:span>, and also drew <text:span text:style-name="T7">water</text:span> enough for us, and watered the flock. <text:line-break/><text:span text:style-name="T5">20</text:span> And he said unto his daughters, And where <text:span text:style-name="T7">is</text:span> he? why <text:span text:style-name="T7">is</text:span> it <text:span text:style-name="T7">that</text:span> ye have left the man? call him, that he may eat bread.<text:line-break/><text:span text:style-name="T5">21</text:span> And Moses was content to dwell with the man: and he gave Moses <text:span text:style-name="T6">Zipporah</text:span> his daughter.<text:line-break/><text:span text:style-name="T5">22</text:span> And she bare <text:span text:style-name="T7">him</text:span> a son, and he called his name <text:span text:style-name="T6">Gershom</text:span>: for he said, I have been a stranger in a strange land.</text:p>
          </table:table-cell>
        </table:table-row>
        <table:table-row>
          <table:table-cell table:style-name="Table1.A2" office:value-type="string">
            <text:p text:style-name="P2">Exodus 3:1</text:p>
            <text:p text:style-name="P1">Now Moses kept the flock of <text:span text:style-name="T8">Jethro</text:span> his father in law, the priest of Midian: and he led the flock to the backside of the desert, and came to the mountain of God, even to Horeb.</text:p>
          </table:table-cell>
        </table:table-row>
        <table:table-row>
          <table:table-cell table:style-name="Table1.A2" office:value-type="string">
            <text:p text:style-name="P2">Numbers 10:29</text:p>
            <text:p text:style-name="P1">And Moses said unto <text:span text:style-name="T8">Hobab</text:span>, the son of Raguel the Midianite, Moses' father in law, We are journeying unto the place of which the LORD said, I will give it you: come thou with us, and we will do thee good: for the LORD hath spoken good concerning Israel.</text:p>
          </table:table-cell>
        </table:table-row>
        <table:table-row>
          <table:table-cell table:style-name="Table1.A2" office:value-type="string">
            <text:p text:style-name="P3">Judges 1:16</text:p>
            <text:p text:style-name="Table_20_Contents">And the <text:span text:style-name="T6">children of the Kenite</text:span>, Moses' father in law, went up out of the <text:span text:style-name="T6">city of palm trees</text:span><text:span text:style-name="T9"> </text:span><text:span text:style-name="T10">(Jericho)</text:span> with the children of Judah into the wilderness of Judah, which lieth in the south of Arad; and they went and dwelt among the people.</text:p>
          </table:table-cell>
        </table:table-row>
        <table:table-row>
          <table:table-cell table:style-name="Table1.A2" office:value-type="string">
            <text:p text:style-name="P2">Judges 4:11</text:p>
            <text:p text:style-name="P1">Now Heber the Kenite, which was of the children of <text:span text:style-name="T8">Hobab</text:span> the father in law of Moses, had severed himself from the Kenites, and pitched his tent unto the plain of Zaanaim, which <text:span text:style-name="T11">i</text:span>s by Kedesh.</text:p>
          </table:table-cell>
        </table:table-row>
        <table:table-row>
          <table:table-cell table:style-name="Table1.A2" office:value-type="string">
            <text:list text:style-name="L1">
              <text:list-item>
                <text:p text:style-name="P4">He is both a Kenite <text:span text:style-name="T12">(by ancestry) </text:span>and a Midianite <text:span text:style-name="T12">(the land he lived in).</text:span></text:p>
              </text:list-item>
            </text:list>
          </table:table-cell>
        </table:table-row>
      </table:table>
      <text:p text:style-name="P5"/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span text:style-name="T1">Genesis 15:18-21</text:span><text:line-break/><text:span text:style-name="T5">18</text:span> In the same day the LORD made a covenant with Abram, saying, Unto thy seed have I given this land, from the river of Egypt unto the great river, the river Euphrates: <text:line-break/><text:span text:style-name="T5">19</text:span> The <text:span text:style-name="T6">Kenites</text:span>, and the Kenizzites, and the Kadmonites, <text:line-break/><text:span text:style-name="T5">20</text:span> And the Hittites, and the Perizzites, and the Rephaims, <text:line-break/><text:span text:style-name="T5">21</text:span> And the Amorites, and the Canaanites, and the Girgashites, and the Jebusites.</text:p>
          </table:table-cell>
        </table:table-row>
      </table:table>
      <text:p text:style-name="P5"/>
      <table:table table:name="Table3" table:style-name="Table3">
        <table:table-column table:style-name="Table3.A"/>
        <table:table-row>
          <table:table-cell table:style-name="Table3.A1" office:value-type="string">
            <text:p text:style-name="P6">1 Chronicles 2:55</text:p>
            <text:p text:style-name="P7">And the families of the scribes which dwelt at Jabez; the Tirathites, the Shimeathites, and Suchathites. These are the <text:span text:style-name="T6">Kenites</text:span> that came of Hemath, the father of the house of Rechab.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15in" fo:margin-bottom="0.15in" fo:margin-left="0.15in" fo:margin-right="0.1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26T10:07:19.829000000</meta:creation-date>
    <meta:editing-duration>PT9M36S</meta:editing-duration>
    <meta:editing-cycles>9</meta:editing-cycles>
    <meta:generator>LibreOffice/26.2.4.2$Linux_X86_64 LibreOffice_project/64a984c51f4702dbd3710b13428c673a2f1292e7</meta:generator>
    <dc:title>BibleStudyTemplate</dc:title>
    <dc:date>2026-07-11T12:19:51.130131865</dc:date>
    <meta:document-statistic meta:table-count="3" meta:image-count="0" meta:object-count="0" meta:page-count="1" meta:paragraph-count="13" meta:word-count="525" meta:character-count="2724" meta:non-whitespace-character-count="2209"/>
    <meta:template xlink:type="simple" xlink:actuate="onRequest" xlink:title="BibleStudyTemplate" xlink:href="../../../../AppData/Roaming/LibreOffice/4/user/template/BibleStudyTemplate.ott" meta:date="2025-05-26T10:07:19.473000000"/>
  </office:meta>
</office:document-meta>
</file>