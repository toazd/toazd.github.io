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007in" fo:margin-left="0in" table:align="left"/>
    </style:style>
    <style:style style:name="Table1.A" style:family="table-column">
      <style:table-column-properties style:column-width="0.4889in"/>
    </style:style>
    <style:style style:name="Table1.B" style:family="table-column">
      <style:table-column-properties style:column-width="1.9951in"/>
    </style:style>
    <style:style style:name="Table1.C" style:family="table-column">
      <style:table-column-properties style:column-width="1.066in"/>
    </style:style>
    <style:style style:name="Table1.D" style:family="table-column">
      <style:table-column-properties style:column-width="2.4278in"/>
    </style:style>
    <style:style style:name="Table1.E" style:family="table-column">
      <style:table-column-properties style:column-width="1.9229in"/>
    </style:style>
    <style:style style:name="Table1.A1" style:family="table-cell">
      <style:table-cell-properties style:vertical-align="middle" fo:padding="0.0597in" fo:border="0.75pt solid #b2b2b2"/>
    </style:style>
    <style:style style:name="Table1.A2" style:family="table-cell">
      <style:table-cell-properties style:vertical-align="middle" fo:padding="0.0597in" fo:border-left="0.75pt solid #b2b2b2" fo:border-right="none" fo:border-top="none" fo:border-bottom="0.75pt solid #b2b2b2"/>
    </style:style>
    <style:style style:name="Table1.E2" style:family="table-cell">
      <style:table-cell-properties style:vertical-align="middle" fo:padding="0.0597in" fo:border-left="0.75pt solid #b2b2b2" fo:border-right="0.75pt solid #b2b2b2" fo:border-top="none" fo:border-bottom="0.75pt solid #b2b2b2"/>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201in" fo:border="0.75pt solid #b2b2b2"/>
    </style:style>
    <style:style style:name="Table2.A2" style:family="table-cell">
      <style:table-cell-properties fo:padding="0.0201in" fo:border-left="0.75pt solid #b2b2b2" fo:border-right="0.75pt solid #b2b2b2" fo:border-top="none" fo:border-bottom="0.75pt solid #b2b2b2"/>
    </style:style>
    <style:style style:name="Table3" style:family="table">
      <style:table-properties style:width="6.3194in" style:rel-width="80%" table:align="center"/>
    </style:style>
    <style:style style:name="Table3.A" style:family="table-column">
      <style:table-column-properties style:column-width="6.3194in" style:rel-column-width="9100*"/>
    </style:style>
    <style:style style:name="Table3.A1" style:family="table-cell">
      <style:table-cell-properties fo:padding="0.0382in" fo:border="0.75pt solid #b2b2b2"/>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75pt solid #b2b2b2"/>
    </style:style>
    <style:style style:name="Table4.A2" style:family="table-cell">
      <style:table-cell-properties fo:padding="0.0382in" fo:border-left="0.75pt solid #b2b2b2" fo:border-right="0.75pt solid #b2b2b2" fo:border-top="none" fo:border-bottom="0.75pt solid #b2b2b2"/>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Gabriela" fo:font-size="14pt" officeooo:rsid="0019c7c7" officeooo:paragraph-rsid="0019c7c7" style:font-size-asian="14pt" style:font-size-complex="14pt"/>
    </style:style>
    <style:style style:name="P2" style:family="paragraph" style:parent-style-name="Standard">
      <style:text-properties officeooo:paragraph-rsid="0019c7c7"/>
    </style:style>
    <style:style style:name="P3" style:family="paragraph" style:parent-style-name="Standard">
      <style:text-properties officeooo:rsid="0019c7c7" officeooo:paragraph-rsid="0019c7c7"/>
    </style:style>
    <style:style style:name="P4" style:family="paragraph" style:parent-style-name="Table_20_Contents">
      <style:paragraph-properties fo:text-align="center" style:justify-single-word="false"/>
      <style:text-properties fo:font-weight="bold" officeooo:rsid="0019c7c7" officeooo:paragraph-rsid="0019c7c7" style:font-weight-asian="bold" style:font-weight-complex="bold"/>
    </style:style>
    <style:style style:name="P5" style:family="paragraph" style:parent-style-name="Table_20_Contents">
      <style:paragraph-properties fo:text-align="center" style:justify-single-word="false"/>
      <style:text-properties fo:font-weight="bold" officeooo:rsid="00c60bcf" officeooo:paragraph-rsid="00c60bcf" style:font-weight-asian="bold" style:font-weight-complex="bold"/>
    </style:style>
    <style:style style:name="P6" style:family="paragraph" style:parent-style-name="Table_20_Contents">
      <style:paragraph-properties fo:text-align="center" style:justify-single-word="false"/>
      <style:text-properties fo:font-weight="normal" officeooo:rsid="0019c7c7" officeooo:paragraph-rsid="0019c7c7" style:font-weight-asian="normal" style:font-weight-complex="normal"/>
    </style:style>
    <style:style style:name="P7" style:family="paragraph" style:parent-style-name="Table_20_Contents">
      <style:paragraph-properties fo:text-align="center" style:justify-single-word="false"/>
      <style:text-properties fo:font-weight="bold" officeooo:rsid="00356703" officeooo:paragraph-rsid="00356703" style:font-weight-asian="bold" style:font-weight-complex="bold"/>
    </style:style>
    <style:style style:name="P8" style:family="paragraph" style:parent-style-name="Table_20_Contents">
      <style:paragraph-properties fo:text-align="center" style:justify-single-word="false"/>
      <style:text-properties fo:font-weight="normal" officeooo:rsid="00356703" officeooo:paragraph-rsid="00356703" style:font-weight-asian="normal" style:font-weight-complex="normal"/>
    </style:style>
    <style:style style:name="P9" style:family="paragraph" style:parent-style-name="Table_20_Contents">
      <style:paragraph-properties fo:text-align="center" style:justify-single-word="false"/>
      <style:text-properties fo:font-weight="bold" officeooo:rsid="005f42ac" officeooo:paragraph-rsid="005f42ac"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01abf5f" officeooo:paragraph-rsid="001abf5f"/>
    </style:style>
    <style:style style:name="P12" style:family="paragraph" style:parent-style-name="Table_20_Contents">
      <style:paragraph-properties fo:text-align="center" style:justify-single-word="false"/>
      <style:text-properties fo:font-weight="bold" officeooo:rsid="001abf5f" officeooo:paragraph-rsid="001abf5f" style:font-weight-asian="bold" style:font-weight-complex="bold"/>
    </style:style>
    <style:style style:name="P13" style:family="paragraph" style:parent-style-name="Table_20_Contents">
      <style:paragraph-properties fo:text-align="center" style:justify-single-word="false"/>
      <style:text-properties officeooo:rsid="0027a3c9" officeooo:paragraph-rsid="0027a3c9"/>
    </style:style>
    <style:style style:name="P14" style:family="paragraph" style:parent-style-name="Table_20_Contents">
      <style:paragraph-properties fo:text-align="center" style:justify-single-word="false"/>
      <style:text-properties officeooo:rsid="001da444" officeooo:paragraph-rsid="001da444"/>
    </style:style>
    <style:style style:name="P15" style:family="paragraph" style:parent-style-name="Table_20_Contents">
      <style:paragraph-properties fo:text-align="center" style:justify-single-word="false"/>
      <style:text-properties fo:font-weight="normal" officeooo:rsid="0062b53d" officeooo:paragraph-rsid="0062b53d" style:font-weight-asian="normal" style:font-weight-complex="normal"/>
    </style:style>
    <style:style style:name="P16" style:family="paragraph" style:parent-style-name="Table_20_Contents">
      <style:paragraph-properties fo:text-align="center" style:justify-single-word="false"/>
      <style:text-properties fo:font-weight="normal" officeooo:rsid="006576f9" officeooo:paragraph-rsid="006576f9" style:font-weight-asian="normal" style:font-weight-complex="normal"/>
    </style:style>
    <style:style style:name="P17" style:family="paragraph" style:parent-style-name="Table_20_Contents">
      <style:paragraph-properties fo:text-align="center" style:justify-single-word="false"/>
      <style:text-properties officeooo:rsid="001df0c7" officeooo:paragraph-rsid="001df0c7"/>
    </style:style>
    <style:style style:name="P18" style:family="paragraph" style:parent-style-name="Table_20_Contents">
      <style:paragraph-properties fo:text-align="center" style:justify-single-word="false"/>
      <style:text-properties fo:font-weight="normal" officeooo:rsid="001abf5f" officeooo:paragraph-rsid="001abf5f" style:font-weight-asian="normal" style:font-weight-complex="normal"/>
    </style:style>
    <style:style style:name="P19" style:family="paragraph" style:parent-style-name="Table_20_Contents">
      <style:paragraph-properties fo:text-align="center" style:justify-single-word="false"/>
      <style:text-properties officeooo:rsid="002ad643" officeooo:paragraph-rsid="002ad643"/>
    </style:style>
    <style:style style:name="P20" style:family="paragraph" style:parent-style-name="Table_20_Contents">
      <style:paragraph-properties fo:text-align="center" style:justify-single-word="false"/>
      <style:text-properties officeooo:rsid="001e7214" officeooo:paragraph-rsid="001e7214"/>
    </style:style>
    <style:style style:name="P21" style:family="paragraph" style:parent-style-name="Table_20_Contents">
      <style:paragraph-properties fo:text-align="center" style:justify-single-word="false"/>
      <style:text-properties officeooo:rsid="00206299" officeooo:paragraph-rsid="0031132d"/>
    </style:style>
    <style:style style:name="P22" style:family="paragraph" style:parent-style-name="Table_20_Contents">
      <style:paragraph-properties fo:text-align="center" style:justify-single-word="false"/>
      <style:text-properties officeooo:rsid="001abf5f" officeooo:paragraph-rsid="0031132d"/>
    </style:style>
    <style:style style:name="P23" style:family="paragraph" style:parent-style-name="Table_20_Contents">
      <style:paragraph-properties fo:text-align="center" style:justify-single-word="false"/>
      <style:text-properties officeooo:rsid="002b6b08" officeooo:paragraph-rsid="002b6b08"/>
    </style:style>
    <style:style style:name="P24" style:family="paragraph" style:parent-style-name="Table_20_Contents">
      <style:paragraph-properties fo:text-align="center" style:justify-single-word="false"/>
      <style:text-properties fo:font-weight="normal" officeooo:rsid="00393b63" officeooo:paragraph-rsid="00393b63" style:font-weight-asian="normal" style:font-weight-complex="normal"/>
    </style:style>
    <style:style style:name="P25" style:family="paragraph" style:parent-style-name="Table_20_Contents">
      <style:paragraph-properties fo:text-align="center" style:justify-single-word="false"/>
      <style:text-properties officeooo:rsid="002d67a4" officeooo:paragraph-rsid="002d67a4"/>
    </style:style>
    <style:style style:name="P26" style:family="paragraph" style:parent-style-name="Table_20_Contents">
      <style:paragraph-properties fo:text-align="center" style:justify-single-word="false"/>
      <style:text-properties officeooo:rsid="00218142" officeooo:paragraph-rsid="00218142"/>
    </style:style>
    <style:style style:name="P27" style:family="paragraph" style:parent-style-name="Table_20_Contents">
      <style:paragraph-properties fo:text-align="center" style:justify-single-word="false"/>
      <style:text-properties officeooo:rsid="00243be4" officeooo:paragraph-rsid="00243be4"/>
    </style:style>
    <style:style style:name="P28" style:family="paragraph" style:parent-style-name="Table_20_Contents">
      <style:paragraph-properties fo:text-align="center" style:justify-single-word="false"/>
      <style:text-properties fo:font-weight="bold" officeooo:rsid="001aedce" officeooo:paragraph-rsid="001aedce" style:font-weight-asian="bold" style:font-weight-complex="bold"/>
    </style:style>
    <style:style style:name="P29" style:family="paragraph" style:parent-style-name="Table_20_Contents">
      <style:paragraph-properties fo:text-align="center" style:justify-single-word="false"/>
      <style:text-properties officeooo:rsid="0025191e" officeooo:paragraph-rsid="0025191e"/>
    </style:style>
    <style:style style:name="P30" style:family="paragraph" style:parent-style-name="Table_20_Contents">
      <style:paragraph-properties fo:text-align="center" style:justify-single-word="false"/>
      <style:text-properties fo:font-weight="normal" officeooo:rsid="001aedce" officeooo:paragraph-rsid="001aedce" style:font-weight-asian="normal" style:font-weight-complex="normal"/>
    </style:style>
    <style:style style:name="P31" style:family="paragraph" style:parent-style-name="Table_20_Contents">
      <style:paragraph-properties fo:text-align="center" style:justify-single-word="false"/>
      <style:text-properties officeooo:rsid="001aedce" officeooo:paragraph-rsid="0031132d"/>
    </style:style>
    <style:style style:name="P32" style:family="paragraph" style:parent-style-name="Table_20_Contents">
      <style:paragraph-properties fo:text-align="center" style:justify-single-word="false"/>
      <style:text-properties officeooo:rsid="002e0230" officeooo:paragraph-rsid="002e0230"/>
    </style:style>
    <style:style style:name="P33" style:family="paragraph" style:parent-style-name="Table_20_Contents">
      <style:paragraph-properties fo:text-align="center" style:justify-single-word="false"/>
      <style:text-properties officeooo:rsid="0026353f" officeooo:paragraph-rsid="0026353f"/>
    </style:style>
    <style:style style:name="P34" style:family="paragraph" style:parent-style-name="Table_20_Contents">
      <style:paragraph-properties fo:text-align="center" style:justify-single-word="false"/>
      <style:text-properties fo:font-weight="normal" officeooo:rsid="0067578d" officeooo:paragraph-rsid="0067578d" style:font-weight-asian="normal" style:font-weight-complex="normal"/>
    </style:style>
    <style:style style:name="P35" style:family="paragraph" style:parent-style-name="Table_20_Contents">
      <style:paragraph-properties fo:text-align="center" style:justify-single-word="false"/>
      <style:text-properties officeooo:paragraph-rsid="0031132d"/>
    </style:style>
    <style:style style:name="P36" style:family="paragraph" style:parent-style-name="Table_20_Contents">
      <style:paragraph-properties fo:text-align="center" style:justify-single-word="false"/>
      <style:text-properties officeooo:rsid="002f1ddf" officeooo:paragraph-rsid="002f1ddf"/>
    </style:style>
    <style:style style:name="P37" style:family="paragraph" style:parent-style-name="Table_20_Contents">
      <style:paragraph-properties fo:text-align="center" style:justify-single-word="false"/>
      <style:text-properties officeooo:rsid="00269070" officeooo:paragraph-rsid="00269070"/>
    </style:style>
    <style:style style:name="P38" style:family="paragraph" style:parent-style-name="Table_20_Contents">
      <style:paragraph-properties fo:text-align="center" style:justify-single-word="false"/>
      <style:text-properties fo:font-weight="normal" officeooo:rsid="00638c3d" officeooo:paragraph-rsid="00638c3d" style:font-weight-asian="normal" style:font-weight-complex="normal"/>
    </style:style>
    <style:style style:name="P39" style:family="paragraph" style:parent-style-name="Table_20_Contents">
      <style:paragraph-properties fo:text-align="center" style:justify-single-word="false"/>
      <style:text-properties officeooo:rsid="002ff81a" officeooo:paragraph-rsid="002ff81a"/>
    </style:style>
    <style:style style:name="P40" style:family="paragraph" style:parent-style-name="Table_20_Contents">
      <style:paragraph-properties fo:text-align="center" style:justify-single-word="false"/>
      <style:text-properties officeooo:rsid="0026d6ad" officeooo:paragraph-rsid="0026d6ad"/>
    </style:style>
    <style:style style:name="P41" style:family="paragraph" style:parent-style-name="Table_20_Contents">
      <style:paragraph-properties fo:text-align="center" style:justify-single-word="false"/>
      <style:text-properties fo:font-weight="normal" officeooo:rsid="00684716" officeooo:paragraph-rsid="00684716" style:font-weight-asian="normal" style:font-weight-complex="normal"/>
    </style:style>
    <style:style style:name="P42" style:family="paragraph" style:parent-style-name="Table_20_Contents">
      <style:paragraph-properties fo:text-align="center" style:justify-single-word="false"/>
      <style:text-properties officeooo:rsid="0047d8a3" officeooo:paragraph-rsid="0047d8a3"/>
    </style:style>
    <style:style style:name="P43" style:family="paragraph" style:parent-style-name="Table_20_Contents">
      <style:paragraph-properties fo:text-align="center" style:justify-single-word="false"/>
      <style:text-properties fo:font-weight="bold" officeooo:rsid="0047d8a3" officeooo:paragraph-rsid="0047d8a3" style:font-weight-asian="bold" style:font-weight-complex="bold"/>
    </style:style>
    <style:style style:name="P44" style:family="paragraph" style:parent-style-name="Table_20_Contents">
      <style:paragraph-properties fo:text-align="center" style:justify-single-word="false"/>
      <style:text-properties fo:font-weight="bold" officeooo:rsid="00692c10" officeooo:paragraph-rsid="00692c10" style:font-weight-asian="bold" style:font-weight-complex="bold"/>
    </style:style>
    <style:style style:name="P45" style:family="paragraph" style:parent-style-name="Table_20_Contents">
      <style:paragraph-properties fo:text-align="center" style:justify-single-word="false"/>
      <style:text-properties fo:font-weight="normal" officeooo:rsid="00692c10" officeooo:paragraph-rsid="00692c10" style:font-weight-asian="normal" style:font-weight-complex="normal"/>
    </style:style>
    <style:style style:name="P46" style:family="paragraph" style:parent-style-name="Standard">
      <style:text-properties officeooo:rsid="0032c2c9" officeooo:paragraph-rsid="0032c2c9"/>
    </style:style>
    <style:style style:name="P47" style:family="paragraph" style:parent-style-name="Table_20_Contents">
      <style:paragraph-properties fo:text-align="left" style:justify-single-word="false"/>
      <style:text-properties officeooo:paragraph-rsid="0043e434"/>
    </style:style>
    <style:style style:name="P48" style:family="paragraph" style:parent-style-name="Table_20_Contents">
      <style:paragraph-properties fo:text-align="left" style:justify-single-word="false"/>
      <style:text-properties officeooo:paragraph-rsid="0048eea5"/>
    </style:style>
    <style:style style:name="P49" style:family="paragraph" style:parent-style-name="Table_20_Contents">
      <style:paragraph-properties fo:text-align="left" style:justify-single-word="false"/>
      <style:text-properties officeooo:rsid="0048eea5" officeooo:paragraph-rsid="0048eea5"/>
    </style:style>
    <style:style style:name="P50" style:family="paragraph" style:parent-style-name="Table_20_Contents">
      <style:paragraph-properties fo:text-align="left" style:justify-single-word="false"/>
      <style:text-properties fo:color="#127622" loext:opacity="100%"/>
    </style:style>
    <style:style style:name="P51" style:family="paragraph" style:parent-style-name="Table_20_Contents">
      <style:paragraph-properties fo:text-align="left" style:justify-single-word="false"/>
    </style:style>
    <style:style style:name="P52" style:family="paragraph" style:parent-style-name="Table_20_Contents">
      <style:paragraph-properties fo:text-align="left" style:justify-single-word="false"/>
      <style:text-properties officeooo:rsid="004b8fc9" officeooo:paragraph-rsid="004b8fc9"/>
    </style:style>
    <style:style style:name="P53" style:family="paragraph" style:parent-style-name="Table_20_Contents">
      <style:paragraph-properties fo:text-align="left" style:justify-single-word="false"/>
      <style:text-properties officeooo:rsid="0056011f" officeooo:paragraph-rsid="005906ad"/>
    </style:style>
    <style:style style:name="P54" style:family="paragraph" style:parent-style-name="Table_20_Contents" style:list-style-name="L1">
      <style:paragraph-properties fo:text-align="left" style:justify-single-word="false"/>
      <style:text-properties style:text-underline-style="solid" style:text-underline-width="auto" style:text-underline-color="font-color" officeooo:rsid="005a1063" officeooo:paragraph-rsid="005a1063"/>
    </style:style>
    <style:style style:name="P55" style:family="paragraph" style:parent-style-name="Table_20_Contents" style:list-style-name="L2">
      <style:paragraph-properties fo:text-align="left" style:justify-single-word="false"/>
      <style:text-properties officeooo:rsid="005a1063" officeooo:paragraph-rsid="005a1063"/>
    </style:style>
    <style:style style:name="P56" style:family="paragraph" style:parent-style-name="Table_20_Contents" style:list-style-name="L2">
      <style:paragraph-properties fo:text-align="left" style:justify-single-word="false"/>
      <style:text-properties officeooo:rsid="00abde32" officeooo:paragraph-rsid="00abde32"/>
    </style:style>
    <style:style style:name="P57" style:family="paragraph" style:parent-style-name="Table_20_Contents" style:list-style-name="L3">
      <style:paragraph-properties fo:text-align="left" style:justify-single-word="false"/>
      <style:text-properties officeooo:paragraph-rsid="005a1063"/>
    </style:style>
    <style:style style:name="P58" style:family="paragraph" style:parent-style-name="Table_20_Contents" style:list-style-name="L3">
      <style:paragraph-properties fo:text-align="left" style:justify-single-word="false"/>
      <style:text-properties officeooo:rsid="00abde32" officeooo:paragraph-rsid="00abde32"/>
    </style:style>
    <style:style style:name="P59" style:family="paragraph" style:parent-style-name="Table_20_Contents">
      <style:paragraph-properties fo:text-align="center" style:justify-single-word="false"/>
      <style:text-properties officeooo:paragraph-rsid="008542a5"/>
    </style:style>
    <style:style style:name="P60" style:family="paragraph" style:parent-style-name="Table_20_Contents">
      <style:paragraph-properties fo:margin-left="0in" fo:text-align="left" style:justify-single-word="false" fo:text-indent="0in" style:auto-text-indent="false"/>
      <style:text-properties officeooo:rsid="0056011f" officeooo:paragraph-rsid="00840625"/>
    </style:style>
    <style:style style:name="P61" style:family="paragraph" style:parent-style-name="Table_20_Contents">
      <style:paragraph-properties fo:text-align="left" style:justify-single-word="false"/>
      <style:text-properties officeooo:rsid="0074cc61" officeooo:paragraph-rsid="0074cc61"/>
    </style:style>
    <style:style style:name="P62" style:family="paragraph" style:parent-style-name="Table_20_Contents">
      <style:paragraph-properties fo:text-align="left" style:justify-single-word="false"/>
      <style:text-properties officeooo:rsid="0076fc8e" officeooo:paragraph-rsid="007e116f"/>
    </style:style>
    <style:style style:name="P63" style:family="paragraph" style:parent-style-name="Table_20_Contents">
      <style:paragraph-properties fo:text-align="left" style:justify-single-word="false"/>
      <style:text-properties officeooo:paragraph-rsid="00bdb3b4"/>
    </style:style>
    <style:style style:name="P64" style:family="paragraph" style:parent-style-name="Table_20_Contents">
      <style:paragraph-properties fo:text-align="left" style:justify-single-word="false"/>
      <style:text-properties fo:font-weight="normal" officeooo:rsid="008262d1" officeooo:paragraph-rsid="00bdb3b4" style:font-weight-asian="normal" style:font-weight-complex="normal"/>
    </style:style>
    <style:style style:name="P65" style:family="paragraph" style:parent-style-name="Table_20_Contents">
      <style:paragraph-properties fo:text-align="center" style:justify-single-word="false"/>
      <style:text-properties style:font-name="Gabriela" fo:font-size="14pt" fo:font-weight="normal" officeooo:rsid="00d7da67" officeooo:paragraph-rsid="00d7da67" style:font-size-asian="14pt" style:font-weight-asian="normal" style:font-size-complex="14pt" style:font-weight-complex="normal"/>
    </style:style>
    <style:style style:name="P66" style:family="paragraph" style:parent-style-name="Table_20_Contents">
      <style:text-properties officeooo:rsid="00d7da67" officeooo:paragraph-rsid="00d7da67"/>
    </style:style>
    <style:style style:name="P67" style:family="paragraph" style:parent-style-name="Table_20_Contents">
      <style:text-properties officeooo:rsid="00da09ba" officeooo:paragraph-rsid="00da09ba"/>
    </style:style>
    <style:style style:name="P68" style:family="paragraph" style:parent-style-name="Table_20_Contents">
      <style:paragraph-properties fo:text-align="center" style:justify-single-word="false"/>
      <style:text-properties style:font-name="Gabriela" fo:font-size="14pt" officeooo:rsid="00db2cb1" officeooo:paragraph-rsid="00db2cb1" style:font-size-asian="14pt" style:font-size-complex="14pt"/>
    </style:style>
    <style:style style:name="P69" style:family="paragraph" style:parent-style-name="Table_20_Contents">
      <style:text-properties fo:color="#127622" loext:opacity="100%"/>
    </style:style>
    <style:style style:name="P70" style:family="paragraph" style:parent-style-name="Table_20_Contents">
      <style:text-properties officeooo:rsid="00e0745e" officeooo:paragraph-rsid="00e0745e"/>
    </style:style>
    <style:style style:name="P71" style:family="paragraph" style:parent-style-name="Table_20_Contents">
      <style:text-properties style:font-name="Liberation Mono" officeooo:rsid="00e08eb4" officeooo:paragraph-rsid="00e08eb4"/>
    </style:style>
    <style:style style:name="P72" style:family="paragraph" style:parent-style-name="Table_20_Contents">
      <style:text-properties officeooo:rsid="00e096d6" officeooo:paragraph-rsid="00e096d6"/>
    </style:style>
    <style:style style:name="P73" style:family="paragraph" style:parent-style-name="Table_20_Contents">
      <style:text-properties officeooo:rsid="00e1777a" officeooo:paragraph-rsid="00e1777a"/>
    </style:style>
    <style:style style:name="P74" style:family="paragraph" style:parent-style-name="Table_20_Contents">
      <style:text-properties style:font-name="Liberation Mono" officeooo:rsid="00e184f3" officeooo:paragraph-rsid="00e184f3"/>
    </style:style>
    <style:style style:name="P75" style:family="paragraph" style:parent-style-name="Table_20_Contents">
      <style:text-properties style:font-name="Liberation Mono" officeooo:rsid="00e25753" officeooo:paragraph-rsid="00e25753"/>
    </style:style>
    <style:style style:name="P76" style:family="paragraph" style:parent-style-name="Table_20_Contents">
      <style:text-properties style:font-name="Liberation Mono" officeooo:rsid="00e27c12" officeooo:paragraph-rsid="00e27c12"/>
    </style:style>
    <style:style style:name="P77" style:family="paragraph" style:parent-style-name="Table_20_Contents">
      <style:text-properties style:font-name="Liberation Mono" officeooo:rsid="00e56266" officeooo:paragraph-rsid="00e56266"/>
    </style:style>
    <style:style style:name="P78" style:family="paragraph" style:parent-style-name="Table_20_Contents">
      <style:text-properties officeooo:rsid="00e60c78" officeooo:paragraph-rsid="00e60c78"/>
    </style:style>
    <style:style style:name="P79" style:family="paragraph" style:parent-style-name="Table_20_Contents">
      <style:paragraph-properties fo:text-align="center" style:justify-single-word="false"/>
      <style:text-properties officeooo:rsid="00e681cf" officeooo:paragraph-rsid="00e681cf"/>
    </style:style>
    <style:style style:name="P80" style:family="paragraph" style:parent-style-name="Table_20_Contents">
      <style:text-properties officeooo:rsid="00e7adda" officeooo:paragraph-rsid="00e7adda"/>
    </style:style>
    <style:style style:name="P81" style:family="paragraph" style:parent-style-name="Table_20_Contents">
      <style:text-properties officeooo:rsid="00ea0daf" officeooo:paragraph-rsid="00f91f81"/>
    </style:style>
    <style:style style:name="P82" style:family="paragraph" style:parent-style-name="Table_20_Contents">
      <style:text-properties officeooo:rsid="00fb0443" officeooo:paragraph-rsid="00fb0443"/>
    </style:style>
    <style:style style:name="T1" style:family="text">
      <style:text-properties officeooo:rsid="00d2c073"/>
    </style:style>
    <style:style style:name="T2" style:family="text">
      <style:text-properties officeooo:rsid="0019c7c7"/>
    </style:style>
    <style:style style:name="T3" style:family="text">
      <style:text-properties fo:font-style="italic" officeooo:rsid="0019c7c7" style:font-style-asian="italic" style:font-style-complex="italic"/>
    </style:style>
    <style:style style:name="T4" style:family="text">
      <style:text-properties officeooo:rsid="00cea9cd"/>
    </style:style>
    <style:style style:name="T5" style:family="text">
      <style:text-properties officeooo:rsid="00bfa392"/>
    </style:style>
    <style:style style:name="T6" style:family="text">
      <style:text-properties fo:font-weight="bold" officeooo:rsid="00bfa392" style:font-weight-asian="bold" style:font-weight-complex="bold"/>
    </style:style>
    <style:style style:name="T7" style:family="text">
      <style:text-properties officeooo:rsid="00c1780f"/>
    </style:style>
    <style:style style:name="T8" style:family="text">
      <style:text-properties officeooo:rsid="0047d8a3"/>
    </style:style>
    <style:style style:name="T9" style:family="text">
      <style:text-properties officeooo:rsid="006b3fa4"/>
    </style:style>
    <style:style style:name="T10" style:family="text">
      <style:text-properties fo:color="#127622" loext:opacity="100%"/>
    </style:style>
    <style:style style:name="T11" style:family="text">
      <style:text-properties fo:color="#127622" loext:opacity="100%" officeooo:rsid="00299839"/>
    </style:style>
    <style:style style:name="T12" style:family="text">
      <style:text-properties officeooo:rsid="00378d16"/>
    </style:style>
    <style:style style:name="T13" style:family="text">
      <style:text-properties fo:font-weight="bold" style:font-weight-asian="bold" style:font-weight-complex="bold"/>
    </style:style>
    <style:style style:name="T14" style:family="text">
      <style:text-properties fo:font-weight="bold" officeooo:rsid="001c44c7" style:font-weight-asian="bold" style:font-weight-complex="bold"/>
    </style:style>
    <style:style style:name="T15" style:family="text">
      <style:text-properties fo:font-weight="bold" officeooo:rsid="00379ead" style:font-weight-asian="bold" style:font-weight-complex="bold"/>
    </style:style>
    <style:style style:name="T16" style:family="text">
      <style:text-properties officeooo:rsid="002ad643"/>
    </style:style>
    <style:style style:name="T17" style:family="text">
      <style:text-properties fo:color="#ffbf00" loext:opacity="100%" officeooo:rsid="0031132d"/>
    </style:style>
    <style:style style:name="T18" style:family="text">
      <style:text-properties officeooo:rsid="0037d8ec"/>
    </style:style>
    <style:style style:name="T19" style:family="text">
      <style:text-properties officeooo:rsid="0038bc85"/>
    </style:style>
    <style:style style:name="T20" style:family="text">
      <style:text-properties officeooo:rsid="002b6b08"/>
    </style:style>
    <style:style style:name="T21" style:family="text">
      <style:text-properties fo:font-weight="bold" officeooo:rsid="0022d51d" style:font-weight-asian="bold" style:font-weight-complex="bold"/>
    </style:style>
    <style:style style:name="T22" style:family="text">
      <style:text-properties fo:font-weight="bold" officeooo:rsid="00393b63" style:font-weight-asian="bold" style:font-weight-complex="bold"/>
    </style:style>
    <style:style style:name="T23" style:family="text">
      <style:text-properties fo:color="#5983b0" loext:opacity="100%" fo:font-weight="bold" officeooo:rsid="0043e434" style:font-weight-asian="bold" style:font-weight-complex="bold"/>
    </style:style>
    <style:style style:name="T24" style:family="text">
      <style:text-properties officeooo:rsid="002d67a4"/>
    </style:style>
    <style:style style:name="T25" style:family="text">
      <style:text-properties officeooo:rsid="003a052c"/>
    </style:style>
    <style:style style:name="T26" style:family="text">
      <style:text-properties fo:color="#ff0000" loext:opacity="100%" officeooo:rsid="00243be4"/>
    </style:style>
    <style:style style:name="T27" style:family="text">
      <style:text-properties fo:color="#127622" loext:opacity="100%" officeooo:rsid="0022d494"/>
    </style:style>
    <style:style style:name="T28" style:family="text">
      <style:text-properties fo:color="#127622" loext:opacity="100%" officeooo:rsid="00243be4"/>
    </style:style>
    <style:style style:name="T29" style:family="text">
      <style:text-properties officeooo:rsid="00243be4"/>
    </style:style>
    <style:style style:name="T30" style:family="text">
      <style:text-properties officeooo:rsid="003a24ee"/>
    </style:style>
    <style:style style:name="T31" style:family="text">
      <style:text-properties fo:color="#127622" loext:opacity="100%" officeooo:rsid="0033eb82"/>
    </style:style>
    <style:style style:name="T32" style:family="text">
      <style:text-properties officeooo:rsid="003b3a67"/>
    </style:style>
    <style:style style:name="T33" style:family="text">
      <style:text-properties officeooo:rsid="002e0230"/>
    </style:style>
    <style:style style:name="T34" style:family="text">
      <style:text-properties officeooo:rsid="003d2ce1"/>
    </style:style>
    <style:style style:name="T35" style:family="text">
      <style:text-properties officeooo:rsid="003e6316"/>
    </style:style>
    <style:style style:name="T36" style:family="text">
      <style:text-properties officeooo:rsid="002f1ddf"/>
    </style:style>
    <style:style style:name="T37" style:family="text">
      <style:text-properties officeooo:rsid="003f4904"/>
    </style:style>
    <style:style style:name="T38" style:family="text">
      <style:text-properties officeooo:rsid="002ff81a"/>
    </style:style>
    <style:style style:name="T39" style:family="text">
      <style:text-properties officeooo:rsid="003fb8ae"/>
    </style:style>
    <style:style style:name="T40" style:family="text">
      <style:text-properties fo:color="#ff0000" loext:opacity="100%"/>
    </style:style>
    <style:style style:name="T41" style:family="text">
      <style:text-properties officeooo:rsid="0043e434"/>
    </style:style>
    <style:style style:name="T42" style:family="text">
      <style:text-properties officeooo:rsid="00470d97"/>
    </style:style>
    <style:style style:name="T43" style:family="text">
      <style:text-properties style:text-position="super 58%" officeooo:rsid="0043e434"/>
    </style:style>
    <style:style style:name="T44" style:family="text">
      <style:text-properties officeooo:rsid="0045376e"/>
    </style:style>
    <style:style style:name="T45" style:family="text">
      <style:text-properties officeooo:rsid="0048eea5"/>
    </style:style>
    <style:style style:name="T46" style:family="text">
      <style:text-properties officeooo:rsid="004c24b4"/>
    </style:style>
    <style:style style:name="T47" style:family="text">
      <style:text-properties fo:color="#127622" loext:opacity="100%" officeooo:rsid="0048eea5"/>
    </style:style>
    <style:style style:name="T48" style:family="text">
      <style:text-properties officeooo:rsid="0049b3f2"/>
    </style:style>
    <style:style style:name="T49" style:family="text">
      <style:text-properties officeooo:rsid="00c66b35"/>
    </style:style>
    <style:style style:name="T50" style:family="text">
      <style:text-properties officeooo:rsid="00c75709"/>
    </style:style>
    <style:style style:name="T51" style:family="text">
      <style:text-properties fo:font-weight="bold" officeooo:rsid="0049b3f2" style:font-weight-asian="bold" style:font-weight-complex="bold"/>
    </style:style>
    <style:style style:name="T52" style:family="text">
      <style:text-properties fo:font-style="italic" fo:font-weight="bold" officeooo:rsid="0049b3f2" style:font-style-asian="italic" style:font-weight-asian="bold" style:font-style-complex="italic" style:font-weight-complex="bold"/>
    </style:style>
    <style:style style:name="T53" style:family="text">
      <style:text-properties officeooo:rsid="00d2030f"/>
    </style:style>
    <style:style style:name="T54" style:family="text">
      <style:text-properties fo:background-color="#ffff00" loext:char-shading-value="0"/>
    </style:style>
    <style:style style:name="T55" style:family="text">
      <style:text-properties fo:background-color="#fff5ce" loext:char-shading-value="0"/>
    </style:style>
    <style:style style:name="T56" style:family="text">
      <style:text-properties officeooo:rsid="0050c3a5"/>
    </style:style>
    <style:style style:name="T57" style:family="text">
      <style:text-properties officeooo:rsid="00c82684"/>
    </style:style>
    <style:style style:name="T58" style:family="text">
      <style:text-properties style:text-position="super 58%" fo:font-weight="bold" style:font-weight-asian="bold" style:font-weight-complex="bold"/>
    </style:style>
    <style:style style:name="T59" style:family="text">
      <style:text-properties officeooo:rsid="0091860b"/>
    </style:style>
    <style:style style:name="T60" style:family="text">
      <style:text-properties style:text-position="super 58%" officeooo:rsid="0091860b"/>
    </style:style>
    <style:style style:name="T61" style:family="text">
      <style:text-properties officeooo:rsid="005396df"/>
    </style:style>
    <style:style style:name="T62" style:family="text">
      <style:text-properties officeooo:rsid="00d5a4cb"/>
    </style:style>
    <style:style style:name="T63" style:family="text">
      <style:text-properties officeooo:rsid="008eaac8"/>
    </style:style>
    <style:style style:name="T64" style:family="text">
      <style:text-properties officeooo:rsid="0056011f"/>
    </style:style>
    <style:style style:name="T65" style:family="text">
      <style:text-properties officeooo:rsid="005906ad"/>
    </style:style>
    <style:style style:name="T66" style:family="text">
      <style:text-properties officeooo:rsid="005c0f21"/>
    </style:style>
    <style:style style:name="T67" style:family="text">
      <style:text-properties officeooo:rsid="00afac69"/>
    </style:style>
    <style:style style:name="T68" style:family="text">
      <style:text-properties officeooo:rsid="00af2519"/>
    </style:style>
    <style:style style:name="T69" style:family="text">
      <style:text-properties officeooo:rsid="0093c7ca"/>
    </style:style>
    <style:style style:name="T70" style:family="text">
      <style:text-properties officeooo:rsid="005a1063"/>
    </style:style>
    <style:style style:name="T71" style:family="text">
      <style:text-properties officeooo:rsid="0072b33d"/>
    </style:style>
    <style:style style:name="T72" style:family="text">
      <style:text-properties style:text-position="super 58%" officeooo:rsid="0072b33d"/>
    </style:style>
    <style:style style:name="T73" style:family="text">
      <style:text-properties officeooo:rsid="00b02d24"/>
    </style:style>
    <style:style style:name="T74" style:family="text">
      <style:text-properties officeooo:rsid="00b555e9"/>
    </style:style>
    <style:style style:name="T75" style:family="text">
      <style:text-properties officeooo:rsid="00cac47c"/>
    </style:style>
    <style:style style:name="T76" style:family="text">
      <style:text-properties fo:font-weight="bold" officeooo:rsid="008d0363" style:font-weight-asian="bold" style:font-weight-complex="bold"/>
    </style:style>
    <style:style style:name="T77" style:family="text">
      <style:text-properties fo:font-weight="bold" officeooo:rsid="008542a5" style:font-weight-asian="bold" style:font-weight-complex="bold"/>
    </style:style>
    <style:style style:name="T78" style:family="text">
      <style:text-properties officeooo:rsid="0057127c"/>
    </style:style>
    <style:style style:name="T79" style:family="text">
      <style:text-properties style:text-position="super 58%" officeooo:rsid="0057127c"/>
    </style:style>
    <style:style style:name="T80" style:family="text">
      <style:text-properties officeooo:rsid="00d26602"/>
    </style:style>
    <style:style style:name="T81" style:family="text">
      <style:text-properties officeooo:rsid="00762a31"/>
    </style:style>
    <style:style style:name="T82" style:family="text">
      <style:text-properties officeooo:rsid="00778750"/>
    </style:style>
    <style:style style:name="T83" style:family="text">
      <style:text-properties officeooo:rsid="00787fbd"/>
    </style:style>
    <style:style style:name="T84" style:family="text">
      <style:text-properties officeooo:rsid="007b1cc8"/>
    </style:style>
    <style:style style:name="T85" style:family="text">
      <style:text-properties fo:font-weight="bold" officeooo:rsid="007bb077" style:font-weight-asian="bold" style:font-weight-complex="bold"/>
    </style:style>
    <style:style style:name="T86" style:family="text">
      <style:text-properties officeooo:rsid="00798ac2"/>
    </style:style>
    <style:style style:name="T87" style:family="text">
      <style:text-properties officeooo:rsid="007d49a5"/>
    </style:style>
    <style:style style:name="T88" style:family="text">
      <style:text-properties officeooo:rsid="0096f525"/>
    </style:style>
    <style:style style:name="T89" style:family="text">
      <style:text-properties officeooo:rsid="0097bf99"/>
    </style:style>
    <style:style style:name="T90" style:family="text">
      <style:text-properties officeooo:rsid="00cb8d05"/>
    </style:style>
    <style:style style:name="T91" style:family="text">
      <style:text-properties officeooo:rsid="00b74864"/>
    </style:style>
    <style:style style:name="T92" style:family="text">
      <style:text-properties fo:font-weight="bold" officeooo:rsid="00b84411" style:font-weight-asian="bold" style:font-weight-complex="bold"/>
    </style:style>
    <style:style style:name="T93" style:family="text">
      <style:text-properties officeooo:rsid="00b84411"/>
    </style:style>
    <style:style style:name="T94" style:family="text">
      <style:text-properties officeooo:rsid="00b8e6c0"/>
    </style:style>
    <style:style style:name="T95" style:family="text">
      <style:text-properties officeooo:rsid="00d6f29a"/>
    </style:style>
    <style:style style:name="T96" style:family="text">
      <style:text-properties officeooo:rsid="007e116f"/>
    </style:style>
    <style:style style:name="T97" style:family="text">
      <style:text-properties fo:font-weight="bold" officeooo:rsid="00798ac2" style:font-weight-asian="bold" style:font-weight-complex="bold"/>
    </style:style>
    <style:style style:name="T98" style:family="text">
      <style:text-properties fo:font-weight="normal" officeooo:rsid="00798ac2" style:font-weight-asian="normal" style:font-weight-complex="normal"/>
    </style:style>
    <style:style style:name="T99" style:family="text">
      <style:text-properties fo:font-weight="normal" officeooo:rsid="00999db0" style:font-weight-asian="normal" style:font-weight-complex="normal"/>
    </style:style>
    <style:style style:name="T100" style:family="text">
      <style:text-properties fo:font-weight="normal" officeooo:rsid="007e116f" style:font-weight-asian="normal" style:font-weight-complex="normal"/>
    </style:style>
    <style:style style:name="T101" style:family="text">
      <style:text-properties fo:font-weight="normal" officeooo:rsid="0081f32d" style:font-weight-asian="normal" style:font-weight-complex="normal"/>
    </style:style>
    <style:style style:name="T102" style:family="text">
      <style:text-properties fo:font-weight="normal" officeooo:rsid="007e7be2" style:font-weight-asian="normal" style:font-weight-complex="normal"/>
    </style:style>
    <style:style style:name="T103" style:family="text">
      <style:text-properties fo:font-weight="normal" officeooo:rsid="008262d1" style:font-weight-asian="normal" style:font-weight-complex="normal"/>
    </style:style>
    <style:style style:name="T104" style:family="text">
      <style:text-properties fo:font-weight="normal" officeooo:rsid="00d78756" style:font-weight-asian="normal" style:font-weight-complex="normal"/>
    </style:style>
    <style:style style:name="T105" style:family="text">
      <style:text-properties style:text-position="super 58%" fo:font-weight="normal" officeooo:rsid="008262d1" style:font-weight-asian="normal" style:font-weight-complex="normal"/>
    </style:style>
    <style:style style:name="T106" style:family="text">
      <style:text-properties fo:font-weight="normal" officeooo:rsid="009ae279" style:font-weight-asian="normal" style:font-weight-complex="normal"/>
    </style:style>
    <style:style style:name="T107" style:family="text">
      <style:text-properties fo:color="#127622" loext:opacity="100%" fo:font-weight="normal" officeooo:rsid="009a4261" style:font-weight-asian="normal" style:font-weight-complex="normal"/>
    </style:style>
    <style:style style:name="T108" style:family="text">
      <style:text-properties fo:color="#127622" loext:opacity="100%" fo:font-weight="normal" officeooo:rsid="009c6e57" style:font-weight-asian="normal" style:font-weight-complex="normal"/>
    </style:style>
    <style:style style:name="T109" style:family="text">
      <style:text-properties fo:font-weight="normal" officeooo:rsid="009c6e57" style:font-weight-asian="normal" style:font-weight-complex="normal"/>
    </style:style>
    <style:style style:name="T110" style:family="text">
      <style:text-properties fo:font-weight="normal" officeooo:rsid="009a4261" style:font-weight-asian="normal" style:font-weight-complex="normal"/>
    </style:style>
    <style:style style:name="T111" style:family="text">
      <style:text-properties fo:font-weight="normal" officeooo:rsid="009c1b98" style:font-weight-asian="normal" style:font-weight-complex="normal"/>
    </style:style>
    <style:style style:name="T112" style:family="text">
      <style:text-properties officeooo:rsid="00d87fda"/>
    </style:style>
    <style:style style:name="T113" style:family="text">
      <style:text-properties officeooo:rsid="00da09ba"/>
    </style:style>
    <style:style style:name="T114" style:family="text">
      <style:text-properties officeooo:rsid="00f29377"/>
    </style:style>
    <style:style style:name="T115" style:family="text">
      <style:text-properties officeooo:rsid="00db2cb1"/>
    </style:style>
    <style:style style:name="T116" style:family="text">
      <style:text-properties officeooo:rsid="00dc7272"/>
    </style:style>
    <style:style style:name="T117" style:family="text">
      <style:text-properties officeooo:rsid="00de58dc"/>
    </style:style>
    <style:style style:name="T118" style:family="text">
      <style:text-properties fo:font-style="italic"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officeooo:rsid="00e38495"/>
    </style:style>
    <style:style style:name="T121" style:family="text">
      <style:text-properties officeooo:rsid="00e56266"/>
    </style:style>
    <style:style style:name="T122" style:family="text">
      <style:text-properties style:text-position="super 58%" officeooo:rsid="00e56266"/>
    </style:style>
    <style:style style:name="T123" style:family="text">
      <style:text-properties officeooo:rsid="00e681cf"/>
    </style:style>
    <style:style style:name="T124" style:family="text">
      <style:text-properties officeooo:rsid="00f5a609"/>
    </style:style>
    <style:style style:name="T125" style:family="text">
      <style:text-properties style:font-name="Gabriela" fo:font-size="14pt" style:font-size-asian="14pt" style:font-size-complex="14pt"/>
    </style:style>
    <style:style style:name="T126" style:family="text">
      <style:text-properties officeooo:rsid="00f8fdcd"/>
    </style:style>
    <style:style style:name="T127" style:family="text">
      <style:text-properties style:text-position="super 58%"/>
    </style:style>
    <style:style style:name="T128" style:family="text">
      <style:text-properties officeooo:rsid="00ec7fa2"/>
    </style:style>
    <style:style style:name="T129" style:family="text">
      <style:text-properties fo:font-weight="bold" officeooo:rsid="00ec7fa2" style:font-weight-asian="bold" style:font-weight-complex="bold"/>
    </style:style>
    <style:style style:name="T130" style:family="text">
      <style:text-properties officeooo:rsid="00f91f81"/>
    </style:style>
    <style:style style:name="T131" style:family="text">
      <style:text-properties officeooo:rsid="00eb4100"/>
    </style:style>
    <style:style style:name="T132" style:family="text">
      <style:text-properties officeooo:rsid="00f0cb3d"/>
    </style:style>
    <style:style style:name="T133" style:family="text">
      <style:text-properties officeooo:rsid="00f14f1f"/>
    </style:style>
    <style:style style:name="T134" style:family="text">
      <style:text-properties style:text-position="super 58%" officeooo:rsid="00eb4100"/>
    </style:style>
    <style:style style:name="T135" style:family="text">
      <style:text-properties officeooo:rsid="00efa58a"/>
    </style:style>
    <style:style style:name="T136" style:family="text">
      <style:text-properties officeooo:rsid="00f1ce93"/>
    </style:style>
    <style:style style:name="T137" style:family="text">
      <style:text-properties officeooo:rsid="00fbc762"/>
    </style:style>
    <style:style style:name="T138" style:family="text">
      <style:text-properties officeooo:rsid="00fdaca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 Nisan <text:span text:style-name="T1">always </text:span>the first month of the year?</text:p>
      <text:p text:style-name="Standard"/>
      <text:p text:style-name="P2"><text:span text:style-name="T2">“</text:span><text:span text:style-name="T3">Of course it is!</text:span><text:span text:style-name="T2">”, we might all say. But, you may be surprised to learn that the answer is </text:span><text:span text:style-name="T4">actually</text:span><text:span text:style-name="T5">: </text:span><text:span text:style-name="T6">not always</text:span><text:span text:style-name="T5">.</text:span><text:span text:style-name="T2"> </text:span><text:span text:style-name="T7">Keep reading to learn how. </text:span><text:span text:style-name="T8">First, let’s have a review of the Hebrew months.</text:spa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4">Month names</text:p>
          </table:table-cell>
          <table:covered-table-cell/>
          <table:covered-table-cell/>
          <table:covered-table-cell/>
          <table:covered-table-cell/>
        </table:table-row>
        <table:table-row>
          <table:table-cell table:style-name="Table1.A2" office:value-type="string">
            <text:p text:style-name="P5">#</text:p>
          </table:table-cell>
          <table:table-cell table:style-name="Table1.A2" office:value-type="string">
            <text:p text:style-name="P4">Pre-exilic</text:p>
            <text:p text:style-name="P6">(<text:span text:style-name="T9">before</text:span> Babylonian exile)</text:p>
          </table:table-cell>
          <table:table-cell table:style-name="Table1.A2" office:value-type="string">
            <text:p text:style-name="P7">Babylonian</text:p>
            <text:p text:style-name="P8">(Akkadian)</text:p>
          </table:table-cell>
          <table:table-cell table:style-name="Table1.A2" office:value-type="string">
            <text:p text:style-name="P4">Post-exilic</text:p>
            <text:p text:style-name="P6">(after Babylonian exile)</text:p>
          </table:table-cell>
          <table:table-cell table:style-name="Table1.E2" office:value-type="string">
            <text:p text:style-name="P9">Gregorian</text:p>
            <text:p text:style-name="P10">(modern)</text:p>
          </table:table-cell>
        </table:table-row>
        <table:table-row>
          <table:table-cell table:style-name="Table1.A2" office:value-type="string">
            <text:p text:style-name="P11">1</text:p>
          </table:table-cell>
          <table:table-cell table:style-name="Table1.A2" office:value-type="string">
            <text:p text:style-name="P12">Abib</text:p>
            <text:p text:style-name="P13">(<text:span text:style-name="T10">Exo </text:span><text:span text:style-name="T11">12:2, </text:span><text:span text:style-name="T10">13:4</text:span>)</text:p>
          </table:table-cell>
          <table:table-cell table:style-name="Table1.A2" office:value-type="string">
            <text:p text:style-name="P8">Nīsannu</text:p>
          </table:table-cell>
          <table:table-cell table:style-name="Table1.A2" office:value-type="string">
            <text:p text:style-name="P12">Nisan / <text:span text:style-name="T12">Nysan</text:span></text:p>
            <text:p text:style-name="P14">(<text:span text:style-name="T10">Est 3:7</text:span>)</text:p>
          </table:table-cell>
          <table:table-cell table:style-name="Table1.E2" office:value-type="string">
            <text:p text:style-name="P15"><text:span text:style-name="T13">March</text:span> – <text:span text:style-name="T13">April</text:span></text:p>
            <text:p text:style-name="P16">(Passover)</text:p>
          </table:table-cell>
        </table:table-row>
        <table:table-row>
          <table:table-cell table:style-name="Table1.A2" office:value-type="string">
            <text:p text:style-name="P11">2</text:p>
          </table:table-cell>
          <table:table-cell table:style-name="Table1.A2" office:value-type="string">
            <text:p text:style-name="P12">Zif</text:p>
            <text:p text:style-name="P17">(1Ki 6:1)</text:p>
          </table:table-cell>
          <table:table-cell table:style-name="Table1.A2" office:value-type="string">
            <text:p text:style-name="P18">Ayyāru (Airu)</text:p>
          </table:table-cell>
          <table:table-cell table:style-name="Table1.A2" office:value-type="string">
            <text:p text:style-name="P11"><text:span text:style-name="T13">Iyar</text:span> / <text:span text:style-name="T14">Iyyar / </text:span><text:span text:style-name="T15">Airu</text:span></text:p>
          </table:table-cell>
          <table:table-cell table:style-name="Table1.E2" office:value-type="string">
            <text:p text:style-name="P15"><text:span text:style-name="T13">April</text:span> - <text:span text:style-name="T13">May</text:span></text:p>
          </table:table-cell>
        </table:table-row>
        <table:table-row>
          <table:table-cell table:style-name="Table1.A2" office:value-type="string">
            <text:p text:style-name="P11">3</text:p>
          </table:table-cell>
          <table:table-cell table:style-name="Table1.A2" office:value-type="string">
            <text:p text:style-name="P11"><text:span text:style-name="T16">third month</text:span><text:span text:style-name="T17">*</text:span></text:p>
            <text:p text:style-name="P19">(<text:span text:style-name="T10">Exo 19:1</text:span>)</text:p>
          </table:table-cell>
          <table:table-cell table:style-name="Table1.A2" office:value-type="string">
            <text:p text:style-name="P18">Sīmannu</text:p>
          </table:table-cell>
          <table:table-cell table:style-name="Table1.A2" office:value-type="string">
            <text:p text:style-name="P12">Sivan / <text:span text:style-name="T18">Siwan</text:span></text:p>
            <text:p text:style-name="P20">(<text:span text:style-name="T10">Est 8:9</text:span>)</text:p>
          </table:table-cell>
          <table:table-cell table:style-name="Table1.E2" office:value-type="string">
            <text:p text:style-name="P15"><text:span text:style-name="T13">May</text:span> – <text:span text:style-name="T13">June</text:span></text:p>
            <text:p text:style-name="P16">(Shavuot)</text:p>
          </table:table-cell>
        </table:table-row>
        <table:table-row>
          <table:table-cell table:style-name="Table1.A2" office:value-type="string">
            <text:p text:style-name="P11">4</text:p>
          </table:table-cell>
          <table:table-cell table:style-name="Table1.A2" office:value-type="string">
            <text:p text:style-name="P21"><text:span text:style-name="T16">fourth month</text:span><text:span text:style-name="T17">*</text:span></text:p>
            <text:p text:style-name="P19">(<text:span text:style-name="T10">2Ki 25:3</text:span>)</text:p>
          </table:table-cell>
          <table:table-cell table:style-name="Table1.A2" office:value-type="string">
            <text:p text:style-name="P18">Duʾūzu (Duzu)</text:p>
          </table:table-cell>
          <table:table-cell table:style-name="Table1.A2" office:value-type="string">
            <text:p text:style-name="P12">Tammuz / <text:span text:style-name="T19">Tamuz</text:span></text:p>
          </table:table-cell>
          <table:table-cell table:style-name="Table1.E2" office:value-type="string">
            <text:p text:style-name="P15"><text:span text:style-name="T13">June</text:span> - <text:span text:style-name="T13">July</text:span></text:p>
          </table:table-cell>
        </table:table-row>
        <table:table-row>
          <table:table-cell table:style-name="Table1.A2" office:value-type="string">
            <text:p text:style-name="P11">5</text:p>
          </table:table-cell>
          <table:table-cell table:style-name="Table1.A2" office:value-type="string">
            <text:p text:style-name="P22"><text:span text:style-name="T20">fifth month</text:span><text:span text:style-name="T17">*</text:span></text:p>
            <text:p text:style-name="P23">(<text:span text:style-name="T10">Num 33:38</text:span>)</text:p>
          </table:table-cell>
          <table:table-cell table:style-name="Table1.A2" office:value-type="string">
            <text:p text:style-name="P24">Abu</text:p>
          </table:table-cell>
          <table:table-cell table:style-name="Table1.A2" office:value-type="string">
            <text:p text:style-name="P11"><text:span text:style-name="T13">Ab</text:span> / <text:span text:style-name="T21">Av / </text:span><text:span text:style-name="T22">Menachem Av</text:span><text:span text:style-name="T23">*</text:span></text:p>
          </table:table-cell>
          <table:table-cell table:style-name="Table1.E2" office:value-type="string">
            <text:p text:style-name="P15"><text:span text:style-name="T13">July</text:span> – <text:span text:style-name="T13">August</text:span></text:p>
            <text:p text:style-name="P16">(Tisha B’Av)</text:p>
          </table:table-cell>
        </table:table-row>
        <table:table-row>
          <table:table-cell table:style-name="Table1.A2" office:value-type="string">
            <text:p text:style-name="P11">6</text:p>
          </table:table-cell>
          <table:table-cell table:style-name="Table1.A2" office:value-type="string">
            <text:p text:style-name="P22"><text:span text:style-name="T24">sixth month</text:span><text:span text:style-name="T17">*</text:span></text:p>
            <text:p text:style-name="P25">(<text:span text:style-name="T10">1Ch 27:9</text:span>)</text:p>
          </table:table-cell>
          <table:table-cell table:style-name="Table1.A2" office:value-type="string">
            <text:p text:style-name="P18">Ulūlu</text:p>
          </table:table-cell>
          <table:table-cell table:style-name="Table1.A2" office:value-type="string">
            <text:p text:style-name="P12">Elul / <text:span text:style-name="T25">Ellul</text:span></text:p>
            <text:p text:style-name="P26">(<text:span text:style-name="T10">Neh 6:15</text:span><text:span text:style-name="T26">*</text:span>, <text:span text:style-name="T27">Ha</text:span><text:span text:style-name="T28">g</text:span><text:span text:style-name="T27"> 1:15</text:span><text:span text:style-name="T26">*</text:span><text:span text:style-name="T29">)</text:span></text:p>
          </table:table-cell>
          <table:table-cell table:style-name="Table1.E2" office:value-type="string">
            <text:p text:style-name="P15"><text:span text:style-name="T13">August</text:span> - <text:span text:style-name="T13">September</text:span></text:p>
          </table:table-cell>
        </table:table-row>
        <table:table-row>
          <table:table-cell table:style-name="Table1.A2" office:value-type="string">
            <text:p text:style-name="P11">7</text:p>
          </table:table-cell>
          <table:table-cell table:style-name="Table1.A2" office:value-type="string">
            <text:p text:style-name="P12">Ethanim</text:p>
            <text:p text:style-name="P27">(<text:span text:style-name="T10">1Ki 8:2</text:span>)</text:p>
          </table:table-cell>
          <table:table-cell table:style-name="Table1.A2" office:value-type="string">
            <text:p text:style-name="P18">Tašrītu</text:p>
          </table:table-cell>
          <table:table-cell table:style-name="Table1.A2" office:value-type="string">
            <text:p text:style-name="P12">Tisri / <text:span text:style-name="T30">Tishrei / Tishri</text:span></text:p>
          </table:table-cell>
          <table:table-cell table:style-name="Table1.E2" office:value-type="string">
            <text:p text:style-name="P15"><text:span text:style-name="T13">September</text:span> – <text:span text:style-name="T13">October</text:span></text:p>
            <text:p text:style-name="P16">(Rosh Hashanah and Yom Kippur)</text:p>
          </table:table-cell>
        </table:table-row>
        <table:table-row>
          <table:table-cell table:style-name="Table1.A2" office:value-type="string">
            <text:p text:style-name="P11">8</text:p>
          </table:table-cell>
          <table:table-cell table:style-name="Table1.A2" office:value-type="string">
            <text:p text:style-name="P28">Bul</text:p>
            <text:p text:style-name="P29">(<text:span text:style-name="T10">1</text:span><text:span text:style-name="T31">Ki</text:span><text:span text:style-name="T10"> 6:38</text:span>)</text:p>
          </table:table-cell>
          <table:table-cell table:style-name="Table1.A2" office:value-type="string">
            <text:p text:style-name="P30">Arakhsamna (Arasamnu)</text:p>
          </table:table-cell>
          <table:table-cell table:style-name="Table1.A2" office:value-type="string">
            <text:p text:style-name="P28">Marchesvan / <text:span text:style-name="T32">Cheshvan / Mar-Cheshvan</text:span></text:p>
          </table:table-cell>
          <table:table-cell table:style-name="Table1.E2" office:value-type="string">
            <text:p text:style-name="P15"><text:span text:style-name="T13">October</text:span> - <text:span text:style-name="T13">November</text:span></text:p>
          </table:table-cell>
        </table:table-row>
        <table:table-row>
          <table:table-cell table:style-name="Table1.A2" office:value-type="string">
            <text:p text:style-name="P11">9</text:p>
          </table:table-cell>
          <table:table-cell table:style-name="Table1.A2" office:value-type="string">
            <text:p text:style-name="P31"><text:span text:style-name="T33">ninth month</text:span><text:span text:style-name="T17">*</text:span></text:p>
            <text:p text:style-name="P32">(<text:span text:style-name="T10">1Ch 27:12</text:span>)</text:p>
          </table:table-cell>
          <table:table-cell table:style-name="Table1.A2" office:value-type="string">
            <text:p text:style-name="P30">Kislimu (Kislinu)</text:p>
          </table:table-cell>
          <table:table-cell table:style-name="Table1.A2" office:value-type="string">
            <text:p text:style-name="P28">Chisleu / <text:span text:style-name="T34">Kislev / </text:span><text:span text:style-name="T35">C</text:span><text:span text:style-name="T34">hislev</text:span></text:p>
            <text:p text:style-name="P33">(<text:span text:style-name="T10">Zec 7:1</text:span>)</text:p>
          </table:table-cell>
          <table:table-cell table:style-name="Table1.E2" office:value-type="string">
            <text:p text:style-name="P15"><text:span text:style-name="T13">November</text:span> – <text:span text:style-name="T13">December</text:span></text:p>
            <text:p text:style-name="P34">(Hanukkah)</text:p>
          </table:table-cell>
        </table:table-row>
        <table:table-row>
          <table:table-cell table:style-name="Table1.A2" office:value-type="string">
            <text:p text:style-name="P11">10</text:p>
          </table:table-cell>
          <table:table-cell table:style-name="Table1.A2" office:value-type="string">
            <text:p text:style-name="P35"><text:span text:style-name="T36">tenth month</text:span><text:span text:style-name="T17">*</text:span></text:p>
            <text:p text:style-name="P36">(<text:span text:style-name="T10">Gen 8:5</text:span>)</text:p>
          </table:table-cell>
          <table:table-cell table:style-name="Table1.A2" office:value-type="string">
            <text:p text:style-name="P30">Ṭebētu</text:p>
          </table:table-cell>
          <table:table-cell table:style-name="Table1.A2" office:value-type="string">
            <text:p text:style-name="P28">Tebeth / <text:span text:style-name="T37">Tevet / Tebet</text:span></text:p>
            <text:p text:style-name="P37">(<text:span text:style-name="T10">Est 2:16</text:span>)</text:p>
          </table:table-cell>
          <table:table-cell table:style-name="Table1.E2" office:value-type="string">
            <text:p text:style-name="P38"><text:span text:style-name="T13">December</text:span> - <text:span text:style-name="T13">January</text:span></text:p>
          </table:table-cell>
        </table:table-row>
        <table:table-row>
          <table:table-cell table:style-name="Table1.A2" office:value-type="string">
            <text:p text:style-name="P11">11</text:p>
          </table:table-cell>
          <table:table-cell table:style-name="Table1.A2" office:value-type="string">
            <text:p text:style-name="P35"><text:span text:style-name="T38">eleventh month</text:span><text:span text:style-name="T17">*</text:span></text:p>
            <text:p text:style-name="P39">(<text:span text:style-name="T10">Deu 1:3</text:span>)</text:p>
          </table:table-cell>
          <table:table-cell table:style-name="Table1.A2" office:value-type="string">
            <text:p text:style-name="P30">Šabāṭu</text:p>
          </table:table-cell>
          <table:table-cell table:style-name="Table1.A2" office:value-type="string">
            <text:p text:style-name="P28">Sebat / <text:span text:style-name="T39">Shevat / Sh’vat / Shebat</text:span></text:p>
            <text:p text:style-name="P40">(<text:span text:style-name="T10">Zec 1:7</text:span>)</text:p>
          </table:table-cell>
          <table:table-cell table:style-name="Table1.E2" office:value-type="string">
            <text:p text:style-name="P38"><text:span text:style-name="T13">January</text:span> – <text:span text:style-name="T13">February</text:span></text:p>
            <text:p text:style-name="P41">(Tu BiShvat)</text:p>
          </table:table-cell>
        </table:table-row>
        <table:table-row>
          <table:table-cell table:style-name="Table1.A2" office:value-type="string">
            <text:p text:style-name="P11">12</text:p>
          </table:table-cell>
          <table:table-cell table:style-name="Table1.A2" office:value-type="string">
            <text:p text:style-name="P35"><text:span text:style-name="T38">twelfth month</text:span><text:span text:style-name="T17">*</text:span></text:p>
            <text:p text:style-name="P39">(<text:span text:style-name="T10">2Ki 25:27</text:span>)</text:p>
          </table:table-cell>
          <table:table-cell table:style-name="Table1.A2" office:value-type="string">
            <text:p text:style-name="P30">Addaru</text:p>
          </table:table-cell>
          <table:table-cell table:style-name="Table1.A2" office:value-type="string">
            <text:p text:style-name="P28">Adar / <text:span text:style-name="T8">Adar I</text:span></text:p>
            <text:p text:style-name="P40">(<text:span text:style-name="T10">Est 3:7</text:span>)</text:p>
          </table:table-cell>
          <table:table-cell table:style-name="Table1.E2" office:value-type="string">
            <text:p text:style-name="P38"><text:span text:style-name="T13">February</text:span> – <text:span text:style-name="T13">March</text:span></text:p>
            <text:p text:style-name="P41">(Purim)</text:p>
          </table:table-cell>
        </table:table-row>
        <table:table-row>
          <table:table-cell table:style-name="Table1.A2" office:value-type="string">
            <text:p text:style-name="P42">13</text:p>
          </table:table-cell>
          <table:table-cell table:style-name="Table1.A2" office:value-type="string">
            <text:p text:style-name="P35"/>
          </table:table-cell>
          <table:table-cell table:style-name="Table1.A2" office:value-type="string">
            <text:p text:style-name="P30"/>
          </table:table-cell>
          <table:table-cell table:style-name="Table1.A2" office:value-type="string">
            <text:p text:style-name="P43">Leap Month</text:p>
            <text:p text:style-name="P43">Adar II / Adar Sheni / Adar Bet</text:p>
          </table:table-cell>
          <table:table-cell table:style-name="Table1.E2" office:value-type="string">
            <text:p text:style-name="P44">March</text:p>
            <text:p text:style-name="P45">(7 times every 19 years)</text:p>
          </table:table-cell>
        </table:table-row>
      </table:table>
      <text:p text:style-name="P3"/>
      <text:p text:style-name="P46"><text:span text:style-name="T17">*</text:span> = Known only by their number (there is no record of their names inside or outside the Bible).</text:p>
      <text:p text:style-name="P46"><text:span text:style-name="T40">*</text:span> = Does not prove the month name.</text:p>
      <text:p text:style-name="P47"><text:span text:style-name="T23">*</text:span> = <text:span text:style-name="T41">Historically, the destruction of both temple</text:span><text:span text:style-name="T42">s</text:span><text:span text:style-name="T41"> occurred on the 9</text:span><text:span text:style-name="T43">th</text:span><text:span text:style-name="T41"> day of this month </text:span><text:span text:style-name="T44">(Tisha B'Av).</text:span></text:p>
      <text:p text:style-name="P48"/>
      <text:p text:style-name="P48"><text:soft-page-break/><text:span text:style-name="T45">Now that we’ve review</text:span><text:span text:style-name="T46">ed</text:span><text:span text:style-name="T45"> the Hebrew months, let’s have a look at the book of </text:span><text:span text:style-name="T47">Nehemiah</text:span><text:span text:style-name="T45">. </text:span><text:span text:style-name="T48">After reading chapter one </text:span><text:span text:style-name="T49">and two </text:span><text:span text:style-name="T48">it should be clear that the events of chapter </text:span><text:span text:style-name="T50">one</text:span><text:span text:style-name="T48"> </text:span><text:span text:style-name="T51">must have</text:span><text:span text:style-name="T48"> occurred </text:span><text:span text:style-name="T52">before</text:span><text:span text:style-name="T48"> the events of chapter </text:span><text:span text:style-name="T50">two</text:span><text:span text:style-name="T48">. </text:span><text:span text:style-name="T53">Chapters one and two are written in chronological order.</text:span></text:p>
      <text:p text:style-name="P49"/>
      <table:table table:name="Table2" table:style-name="Table2">
        <table:table-column table:style-name="Table2.A"/>
        <table:table-row>
          <table:table-cell table:style-name="Table2.A1" office:value-type="string">
            <text:p text:style-name="P50">Nehemiah 1:1</text:p>
            <text:p text:style-name="P51">The words of Nehemiah the son of Hachaliah. And it came to pass <text:span text:style-name="T54">in the month Chisleu</text:span>, in the <text:span text:style-name="T55">twentieth year</text:span>, as I was in Shushan the palace,</text:p>
          </table:table-cell>
        </table:table-row>
        <table:table-row>
          <table:table-cell table:style-name="Table2.A2" office:value-type="string">
            <text:p text:style-name="P50">Nehemiah 2:1</text:p>
            <text:p text:style-name="P51">And it came to pass <text:span text:style-name="T54">in the month Nisan</text:span>, <text:span text:style-name="T55">in the twentieth year</text:span> of Artaxerxes the king, that wine was before him: and I took up the wine, and gave it unto the king. Now I had not been beforetime sad in his presence.</text:p>
          </table:table-cell>
        </table:table-row>
      </table:table>
      <text:p text:style-name="P49"/>
      <text:p text:style-name="P52">Now, if we look back at our calendar we might notice <text:span text:style-name="T56">something interesting</text:span>: The month Chisleu is the <text:span text:style-name="T13">ninth month</text:span>. Then, the following “year” the events of chapter <text:span text:style-name="T57">two</text:span> occur in the <text:span text:style-name="T13">first month</text:span> Nisan. But, they are both called <text:span text:style-name="T13">the 20</text:span><text:span text:style-name="T58">th</text:span><text:span text:style-name="T13"> year</text:span>. <text:span text:style-name="T59">How can they both be in the 20</text:span><text:span text:style-name="T60">th</text:span><text:span text:style-name="T59"> year if chapter </text:span><text:span text:style-name="T57">one</text:span><text:span text:style-name="T59"> started in the 9</text:span><text:span text:style-name="T60">th</text:span><text:span text:style-name="T59"> month? </text:span><text:span text:style-name="T61">What we’re seeing here is a Biblical fact that answers the first question: is Nisan </text:span><text:span text:style-name="T62">always </text:span><text:span text:style-name="T61">the first month of the year? No</text:span><text:span text:style-name="T63">t always</text:span><text:span text:style-name="T61">. </text:span><text:span text:style-name="T64">To those of us who are used to using a single calendar throughout the year this can seem confusing at first but it’s really quite simple: the Hebrews didn’t use a single calendar throughout the year, they </text:span><text:span text:style-name="T65">had two:</text:span></text:p>
      <text:p text:style-name="P53"/>
      <text:list xml:id="list2783351250" text:style-name="L1">
        <text:list-item>
          <text:p text:style-name="P54">The <text:span text:style-name="T66">r</text:span>eligious / <text:span text:style-name="T66">feasts / </text:span>Levitical calendar</text:p>
        </text:list-item>
      </text:list>
      <text:list text:style-name="L2">
        <text:list-item>
          <text:list>
            <text:list-item>
              <text:p text:style-name="P55">The year begins with Nisan and ends with Adar.</text:p>
            </text:list-item>
            <text:list-item>
              <text:p text:style-name="P56">This “holy” calendar ensures that God’s commands are <text:span text:style-name="T67">kept</text:span><text:span text:style-name="T68">.</text:span></text:p>
            </text:list-item>
          </text:list>
        </text:list-item>
      </text:list>
      <text:list text:continue-list="list2783351250" text:style-name="L1">
        <text:list-item>
          <text:p text:style-name="P54">The civil / <text:span text:style-name="T69">fiscal</text:span> calendar</text:p>
        </text:list-item>
      </text:list>
      <text:list text:style-name="L3">
        <text:list-item>
          <text:list>
            <text:list-item>
              <text:p text:style-name="P57"><text:span text:style-name="T70">The year begins with Tishrei </text:span><text:span text:style-name="T71">(7</text:span><text:span text:style-name="T72">th</text:span><text:span text:style-name="T71">) and ends with Elul (6</text:span><text:span text:style-name="T72">th</text:span>)<text:span text:style-name="T71">.</text:span></text:p>
            </text:list-item>
            <text:list-item>
              <text:p text:style-name="P58">This “common” calendar aligned with <text:span text:style-name="T73">the harvest seasons and simplified the administration, </text:span><text:span text:style-name="T74">economics, and logistics of </text:span><text:span text:style-name="T73">taxes, tithes, tributes, labor contracts, the releasing of debts and servants, </text:span><text:span text:style-name="T75">etc.</text:span></text:p>
            </text:list-item>
          </text:list>
        </text:list-item>
      </text:list>
      <text:p text:style-name="P53"/>
      <table:table table:name="Table3" table:style-name="Table3">
        <table:table-column table:style-name="Table3.A"/>
        <table:table-row>
          <table:table-cell table:style-name="Table3.A1" office:value-type="string">
            <text:p text:style-name="P59"><text:span text:style-name="T76">ADDITIONAL</text:span><text:span text:style-name="T77"> INFO</text:span></text:p>
            <text:p text:style-name="P60"><text:span text:style-name="T78">There is also archeological evidence that suggests that they had another third “calendar” as evidenced by “The Gezer Calendar” discovered in 1908 (which dates to the reign of Solomon, ~10</text:span><text:span text:style-name="T79">th</text:span><text:span text:style-name="T78"> century B.C.). </text:span><text:span text:style-name="T80">F</text:span><text:span text:style-name="T78">or the purposes of this study we will focus on the two prominent calendars used throughout daily Hebrew life.</text:span></text:p>
          </table:table-cell>
        </table:table-row>
      </table:table>
      <text:p text:style-name="P53"/>
      <text:p text:style-name="P61">So, now that we have found evidence of the two calendar systems that the Hebrews used, the next logical question is why would they do that? At first it seems like that would make things more complicated but for them it actually made things far more simple. <text:span text:style-name="T81">You have to think of it from an economics point of view. T</text:span>he primary reason <text:span text:style-name="T81">why it would be more complicated for us to live by two different calendars and yet </text:span><text:span text:style-name="T82">it was </text:span><text:span text:style-name="T81">more simple for them</text:span> <text:span text:style-name="T82">to </text:span>is because we no longer live in a <text:span text:style-name="T13">primarily agrarian</text:span> society.</text:p>
      <text:p text:style-name="P61"/>
      <text:p text:style-name="P62"><text:span text:style-name="T83">A</text:span> modern parallel <text:span text:style-name="T83">can help us </text:span>to understand th<text:span text:style-name="T83">e economics of their situation bett</text:span><text:span text:style-name="T84">er</text:span>. When are taxes due in the USA? By the end of the first quarter of <text:span text:style-name="T13">the </text:span><text:span text:style-name="T85">new </text:span><text:span text:style-name="T13">year</text:span> and as early as <text:span text:style-name="T13">the first month of the year</text:span>. <text:span text:style-name="T86">Notice how our fiscal year lines up with our calendar year? The Hebrew </text:span><text:span text:style-name="T87">government </text:span><text:span text:style-name="T88">was no different than any other – the </text:span><text:span text:style-name="T87">administration gets more complicated </text:span><text:span text:style-name="T89">(expensive) </text:span><text:span text:style-name="T87">when the fiscal year doesn’t line up with the calendar year. </text:span><text:span text:style-name="T90">M</text:span><text:span text:style-name="T91">oney has to be made </text:span><text:span text:style-name="T92">before</text:span><text:span text:style-name="T93"> it can be used for anything </text:span><text:span text:style-name="T94">else </text:span><text:span text:style-name="T95">(taxes or otherwise).</text:span></text:p>
      <text:p text:style-name="P62"/>
      <text:p text:style-name="P63"><text:span text:style-name="T96">The primary difference for the Hebrews is that </text:span><text:span text:style-name="T86">their fiscal year began </text:span><text:span text:style-name="T97">at the end of harvest</text:span><text:span text:style-name="T98"> in the season we call fall. </text:span><text:span text:style-name="T99">Remember they needed time to both harvest and sell their crops. </text:span><text:span text:style-name="T100">It’s </text:span><text:span text:style-name="T101">simply </text:span><text:span text:style-name="T100">impossible to pay your taxes </text:span><text:span text:style-name="T101">for the “year” </text:span><text:span text:style-name="T100">if you haven’t sold your harvest yet. </text:span><text:span text:style-name="T102">And </text:span><text:span text:style-name="T103">thus their civil/fiscal calendar</text:span><text:span text:style-name="T102"> began exactly where you would expect it to: </text:span><text:span text:style-name="T104">well after</text:span><text:span text:style-name="T102"> the end of </text:span><text:span text:style-name="T103">the </text:span><text:span text:style-name="T102">harvest </text:span><text:span text:style-name="T103">season</text:span><text:span text:style-name="T102"> </text:span><text:span text:style-name="T103">which is the 7</text:span><text:span text:style-name="T105">th</text:span><text:span text:style-name="T103"> month Tishrei (September-October).</text:span></text:p>
      <text:p text:style-name="P64"/>
      <text:p text:style-name="P63"><text:span text:style-name="T106">Simply put,</text:span><text:span text:style-name="T103"> </text:span><text:span text:style-name="T107">Nehemiah </text:span><text:span text:style-name="T108">1:1</text:span> &amp; <text:span text:style-name="T108">2:1</text:span><text:span text:style-name="T109"> </text:span><text:span text:style-name="T110">uses the civil/</text:span><text:span text:style-name="T111">fiscal</text:span><text:span text:style-name="T110"> calendar and not the religious calendar.</text:span></text:p>
      <text:p text:style-name="P65"><text:soft-page-break/>Calendars elsewhere in the Bible</text:p>
      <text:p text:style-name="Table_20_Contents"/>
      <text:p text:style-name="Table_20_Contents"/>
      <text:p text:style-name="P66">Is there evidence and proof of this dual calendar system elsewhere in the Bible? <text:span text:style-name="T112">There </text:span><text:span text:style-name="T113">most definitely </text:span><text:span text:style-name="T114">is.</text:span></text:p>
      <text:p text:style-name="P66"/>
      <text:p text:style-name="P67">First, if you weren’t already aware, the entire old testament <text:span text:style-name="T115">uses</text:span> a counting system called “inclusive counting”. Simply put, <text:span text:style-name="T13">any part of a year</text:span> is counted as <text:span text:style-name="T13">a year</text:span>. Thus, a duration of 7 years and 6 months would be called “8 years” in inclusive counting. <text:span text:style-name="T116">In modern times we almost exclusively use “exclusive counting” and so when we see </text:span><text:span text:style-name="T117">an </text:span><text:span text:style-name="T116">inclusive count we often refer to it as “rounding up”. </text:span>For more details and proof of this see the article “The reckoning of days” <text:span text:style-name="T117">at </text:span><text:a xlink:type="simple" xlink:href="https://cheerful-wmcdannell.wordpress.com/2026/04/16/the-reckoning-of-days/" text:style-name="Internet_20_link" text:visited-style-name="Visited_20_Internet_20_Link">https://cheerful-wmcdannell.wordpress.com/2026/04/16/the-reckoning-of-days/</text:a>.</text:p>
      <text:p text:style-name="P67"/>
      <text:p text:style-name="P67"/>
      <text:p text:style-name="P67"/>
      <text:p text:style-name="P67"/>
      <text:p text:style-name="P68">The civil calendar: Solomon’s temple (<text:span text:style-name="T10">1 Kings 6</text:span>)</text:p>
      <text:p text:style-name="Table_20_Contents"/>
      <table:table table:name="Table4" table:style-name="Table4">
        <table:table-column table:style-name="Table4.A"/>
        <table:table-row>
          <table:table-cell table:style-name="Table4.A1" office:value-type="string">
            <text:p text:style-name="P69">1 Kings 6:1</text:p>
            <text:p text:style-name="Table_20_Contents">And it came to pass in the four hundred and eightieth year after the children of Israel were come out of the land of Egypt, <text:span text:style-name="T54">in the fourth year of Solomon's reign</text:span> over Israel, <text:span text:style-name="T54">in the month Zif</text:span>, which is <text:span text:style-name="T54">the second month</text:span>, that he began to build the house of the LORD.</text:p>
          </table:table-cell>
        </table:table-row>
        <table:table-row>
          <table:table-cell table:style-name="Table4.A2" office:value-type="string">
            <text:p text:style-name="P69">1 Kings 6:37</text:p>
            <text:p text:style-name="Table_20_Contents"><text:span text:style-name="T54">In the fourth year</text:span> was the foundation of the house of the LORD laid, <text:span text:style-name="T54">in the month Zif</text:span>:</text:p>
          </table:table-cell>
        </table:table-row>
        <table:table-row>
          <table:table-cell table:style-name="Table4.A2" office:value-type="string">
            <text:p text:style-name="P69">1 Kings 6:38</text:p>
            <text:p text:style-name="Table_20_Contents">And <text:span text:style-name="T54">in the eleventh year</text:span>, <text:span text:style-name="T54">in the month Bul</text:span>, which is <text:span text:style-name="T54">the eighth month</text:span>, was the house finished throughout all the parts thereof, and according to all the fashion of it. So was he seven years in building it.</text:p>
          </table:table-cell>
        </table:table-row>
      </table:table>
      <text:p text:style-name="Table_20_Contents"/>
      <text:p text:style-name="P70">If we use the religious Nisan-Nisan calendar to calculate the time elapsed from the beginning of the building of the temple to the end it looks like the following:</text:p>
      <text:p text:style-name="P70"/>
      <text:p text:style-name="P71">Year 11 – Year 4 = 7 years</text:p>
      <text:p text:style-name="P71">Month 2 → Month 8 = 6 months</text:p>
      <text:p text:style-name="Table_20_Contents"/>
      <text:p text:style-name="P72">In inclusive counting, this duration would be called “8 years”. But, <text:span text:style-name="T10">1 Kings 6:38f</text:span> very clearly states “<text:span text:style-name="T118">So was he </text:span><text:span text:style-name="T119">seven years</text:span><text:span text:style-name="T118"> in building it.</text:span>”</text:p>
      <text:p text:style-name="P72"/>
      <text:p text:style-name="P73">Let’s redo the calculation using the Tishrei-Tishrei civil calendar:</text:p>
      <text:p text:style-name="P73"/>
      <text:p text:style-name="P74">Month 2 → Month <text:span text:style-name="T120">7</text:span> = <text:span text:style-name="T120">5</text:span> months</text:p>
      <text:p text:style-name="P75">Year 4 → Year 10 = 6 years</text:p>
      <text:p text:style-name="P76">Month 7 → Month 8 <text:span text:style-name="T121">(11</text:span><text:span text:style-name="T122">th</text:span><text:span text:style-name="T121"> year) </text:span>= 1 month</text:p>
      <text:p text:style-name="P77"/>
      <text:p text:style-name="P77">Total = 6 years, 6 months (78 months)</text:p>
      <text:p text:style-name="Table_20_Contents"/>
      <text:p text:style-name="P78">In inclusive counting 6 years and 6 months would be called “7 months” which perfectly aligns with <text:span text:style-name="T10">1Ki 6:38</text:span>. <text:span text:style-name="T123">Thus, the building of Solomons temple uses the civil </text:span><text:span text:style-name="T124">(Tishrei-Tishrei) </text:span><text:span text:style-name="T123">calendar and not the religious calendar </text:span><text:span text:style-name="T124">(Nisan-Nisan)</text:span><text:span text:style-name="T123">.</text:span></text:p>
      <text:p text:style-name="P78"/>
      <text:p text:style-name="P78"/>
      <text:p text:style-name="P78"/>
      <text:p text:style-name="P78"/>
      <text:p text:style-name="P78"/>
      <text:p text:style-name="P79"><text:soft-page-break/><text:span text:style-name="T125">The religious calendar: Haggai &amp; Zechariah</text:span></text:p>
      <text:p text:style-name="Table_20_Contents"/>
      <text:p text:style-name="Table_20_Contents"/>
      <text:p text:style-name="P80">Being contemporaries both Haggai and Zechariah had their ministries during the reign of king Darius of Persia. Unlike Artaxerxes, of which there are two kings of Persia <text:span text:style-name="T126">named</text:span>, there was only one Darius king of Persia.</text:p>
      <text:p text:style-name="P80"/>
      <text:p text:style-name="P80">A simple search for the phrase “second year of Darius” reveals the following:</text:p>
      <text:p text:style-name="P80"/>
      <table:table table:name="Table5" table:style-name="Table5">
        <table:table-column table:style-name="Table5.A"/>
        <table:table-row>
          <table:table-cell table:style-name="Table5.A1" office:value-type="string">
            <text:p text:style-name="P69">Haggai 1:1</text:p>
            <text:p text:style-name="Table_20_Contents"><text:span text:style-name="T54">In the second year of Darius</text:span> the king, in the <text:span text:style-name="T55">sixth month</text:span>, in the first day of the month, came the word of the LORD by Haggai the prophet unto Zerubbabel the son of Shealtiel, governor of Judah, and to Joshua the son of Josedech, the high priest, saying,</text:p>
          </table:table-cell>
        </table:table-row>
        <table:table-row>
          <table:table-cell table:style-name="Table5.A2" office:value-type="string">
            <text:p text:style-name="P69">Haggai 1:15</text:p>
            <text:p text:style-name="Table_20_Contents">In the four and twentieth day of the <text:span text:style-name="T55">sixth month</text:span>, <text:span text:style-name="T54">in the second year of Darius</text:span> the king.</text:p>
          </table:table-cell>
        </table:table-row>
        <table:table-row>
          <table:table-cell table:style-name="Table5.A2" office:value-type="string">
            <text:p text:style-name="P69">Haggai 2:10</text:p>
            <text:p text:style-name="Table_20_Contents">In the four and twentieth day of the <text:span text:style-name="T55">ninth month</text:span>, <text:span text:style-name="T54">in the second year of Darius</text:span>, came the word of the LORD by Haggai the prophet, saying,</text:p>
          </table:table-cell>
        </table:table-row>
        <table:table-row>
          <table:table-cell table:style-name="Table5.A2" office:value-type="string">
            <text:p text:style-name="P69">Zechariah 1:1</text:p>
            <text:p text:style-name="Table_20_Contents">In the <text:span text:style-name="T55">eighth month</text:span>, <text:span text:style-name="T54">in the second year of Darius</text:span>, came the word of the LORD unto Zechariah, the son of Berechiah, the son of Iddo the prophet, saying,</text:p>
          </table:table-cell>
        </table:table-row>
        <table:table-row>
          <table:table-cell table:style-name="Table5.A2" office:value-type="string">
            <text:p text:style-name="P69">Zechariah 1:7</text:p>
            <text:p text:style-name="Table_20_Contents">Upon the four and twentieth day of the <text:span text:style-name="T55">eleventh month</text:span>, which is the month Sebat, <text:span text:style-name="T54">in the second year of Darius</text:span>, came the word of the LORD unto Zechariah, the son of Berechiah, the son of Iddo the prophet, saying,</text:p>
          </table:table-cell>
        </table:table-row>
      </table:table>
      <text:p text:style-name="P80"/>
      <text:p text:style-name="P81">All of these events occurring in the 6<text:span text:style-name="T127">th</text:span>, 8<text:span text:style-name="T127">th</text:span>, 9<text:span text:style-name="T127">th</text:span>, and 11<text:span text:style-name="T127">th</text:span> month <text:span text:style-name="T128">and still being called the same, </text:span><text:span text:style-name="T129">second year</text:span><text:span text:style-name="T128"> </text:span>make it clear that both Haggai &amp; Zechariah are using the Nisan-Nisan religiou<text:span text:style-name="T130">s </text:span>(spring-to-spring Persian) calendar. <text:span text:style-name="T131">Otherwise, </text:span><text:span text:style-name="T132">we would expect to see that </text:span><text:span text:style-name="T133">any month</text:span><text:span text:style-name="T131"> after the </text:span><text:span text:style-name="T133">6</text:span><text:span text:style-name="T134">th</text:span><text:span text:style-name="T131"> month </text:span><text:span text:style-name="T135">would</text:span><text:span text:style-name="T131"> </text:span><text:span text:style-name="T132">be in the third </text:span><text:span text:style-name="T136">(next)</text:span><text:span text:style-name="T132"> year</text:span><text:span text:style-name="T131">.</text:span></text:p>
      <text:p text:style-name="P81"/>
      <text:p text:style-name="P81"/>
      <text:p text:style-name="P81"/>
      <text:p text:style-name="P82"><text:span text:style-name="T137">And so, if anyone ever asks </text:span><text:span text:style-name="T138">us</text:span><text:span text:style-name="T137"> “is Nisan the first month of the year?” we can confidently say: not alway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5T10:31:24.476152887</meta:creation-date>
    <dc:title>Is Nisan always the first month of the year?</dc:title>
    <meta:editing-duration>PT4H45M11S</meta:editing-duration>
    <meta:editing-cycles>247</meta:editing-cycles>
    <meta:generator>LibreOffice/26.2.4.2$Linux_X86_64 LibreOffice_project/64a984c51f4702dbd3710b13428c673a2f1292e7</meta:generator>
    <dc:date>2026-07-11T12:30:58.620568100</dc:date>
    <meta:document-statistic meta:table-count="5" meta:image-count="0" meta:object-count="0" meta:page-count="4" meta:paragraph-count="159" meta:word-count="1660" meta:character-count="9078" meta:non-whitespace-character-count="7574"/>
    <meta:template xlink:type="simple" xlink:actuate="onRequest" xlink:title="default" xlink:href="../../../../Templates/default.ott" meta:date="2026-06-25T10:31:23.692840531"/>
  </office:meta>
</office:document-meta>
</file>