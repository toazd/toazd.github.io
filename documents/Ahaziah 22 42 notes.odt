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9CDC8BDD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2.4167in" style:rel-column-width="20047*"/>
    </style:style>
    <style:style style:name="Table12.B" style:family="table-column">
      <style:table-column-properties style:column-width="1.25in" style:rel-column-width="10369*"/>
    </style:style>
    <style:style style:name="Table12.C" style:family="table-column">
      <style:table-column-properties style:column-width="4.2333in" style:rel-column-width="35119*"/>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Nerd Font" officeooo:rsid="008f237b" officeooo:paragraph-rsid="008f237b"/>
    </style:style>
    <style:style style:name="P2" style:family="paragraph" style:parent-style-name="Standard">
      <style:text-properties officeooo:rsid="0004889c" officeooo:paragraph-rsid="0004889c"/>
    </style:style>
    <style:style style:name="P3" style:family="paragraph" style:parent-style-name="Table_20_Contents">
      <style:text-properties officeooo:paragraph-rsid="0005b0ea"/>
    </style:style>
    <style:style style:name="P4" style:family="paragraph" style:parent-style-name="Standard" style:list-style-name="L1">
      <style:text-properties officeooo:rsid="0007a8f1" officeooo:paragraph-rsid="0007a8f1"/>
    </style:style>
    <style:style style:name="P5" style:family="paragraph" style:parent-style-name="Standard" style:list-style-name="L1">
      <style:text-properties officeooo:rsid="0051d558" officeooo:paragraph-rsid="0051d558"/>
    </style:style>
    <style:style style:name="P6" style:family="paragraph" style:parent-style-name="Standard" style:list-style-name="L1">
      <style:text-properties fo:font-style="normal" officeooo:rsid="0007a8f1" officeooo:paragraph-rsid="0007a8f1" style:font-style-asian="normal" style:font-style-complex="normal"/>
    </style:style>
    <style:style style:name="P7" style:family="paragraph" style:parent-style-name="Standard" style:list-style-name="L1">
      <style:text-properties fo:font-style="normal" officeooo:rsid="000aba8a" officeooo:paragraph-rsid="000aba8a" style:font-style-asian="normal" style:font-style-complex="normal"/>
    </style:style>
    <style:style style:name="P8" style:family="paragraph" style:parent-style-name="Standard">
      <style:text-properties fo:font-style="normal" officeooo:rsid="000aba8a" officeooo:paragraph-rsid="000aba8a" style:font-style-asian="normal" style:font-style-complex="normal"/>
    </style:style>
    <style:style style:name="P9" style:family="paragraph" style:parent-style-name="Table_20_Contents">
      <style:text-properties officeooo:paragraph-rsid="000ca30e"/>
    </style:style>
    <style:style style:name="P10" style:family="paragraph" style:parent-style-name="Standard" style:list-style-name="L2">
      <style:text-properties fo:font-style="normal" officeooo:rsid="000e8727" officeooo:paragraph-rsid="00148901" style:font-style-asian="normal" style:font-style-complex="normal"/>
    </style:style>
    <style:style style:name="P11" style:family="paragraph" style:parent-style-name="Standard">
      <style:text-properties fo:font-style="normal" officeooo:rsid="000e8727" officeooo:paragraph-rsid="00148901" style:font-style-asian="normal" style:font-style-complex="normal"/>
    </style:style>
    <style:style style:name="P12" style:family="paragraph" style:parent-style-name="Table_20_Contents">
      <style:text-properties officeooo:paragraph-rsid="0013cadb"/>
    </style:style>
    <style:style style:name="P13" style:family="paragraph" style:parent-style-name="Table_20_Contents">
      <style:text-properties officeooo:paragraph-rsid="00148901"/>
    </style:style>
    <style:style style:name="P14" style:family="paragraph" style:parent-style-name="Standard" style:list-style-name="L2">
      <style:text-properties fo:font-style="normal" officeooo:rsid="001260e8" officeooo:paragraph-rsid="00165408" style:font-style-asian="normal" style:font-style-complex="normal"/>
    </style:style>
    <style:style style:name="P15" style:family="paragraph" style:parent-style-name="Standard">
      <style:text-properties fo:font-style="normal" officeooo:rsid="001260e8" officeooo:paragraph-rsid="00165408" style:font-style-asian="normal" style:font-style-complex="normal"/>
    </style:style>
    <style:style style:name="P16" style:family="paragraph" style:parent-style-name="Table_20_Contents">
      <style:text-properties officeooo:paragraph-rsid="0013a646"/>
    </style:style>
    <style:style style:name="P17" style:family="paragraph" style:parent-style-name="Standard" style:list-style-name="L2">
      <style:text-properties fo:font-style="normal" officeooo:rsid="00197be9" officeooo:paragraph-rsid="001aa0e8" style:font-style-asian="normal" style:font-style-complex="normal"/>
    </style:style>
    <style:style style:name="P18" style:family="paragraph" style:parent-style-name="Standard" style:list-style-name="L2">
      <style:text-properties fo:font-style="normal" officeooo:rsid="001aa0e8" officeooo:paragraph-rsid="001aa0e8" style:font-style-asian="normal" style:font-style-complex="normal"/>
    </style:style>
    <style:style style:name="P19" style:family="paragraph" style:parent-style-name="Standard">
      <style:text-properties fo:font-style="normal" officeooo:rsid="001aa0e8" officeooo:paragraph-rsid="001aa0e8" style:font-style-asian="normal" style:font-style-complex="normal"/>
    </style:style>
    <style:style style:name="P20" style:family="paragraph" style:parent-style-name="Standard">
      <style:paragraph-properties fo:text-align="center" style:justify-single-word="false"/>
      <style:text-properties fo:font-style="normal" officeooo:rsid="001aa0e8" officeooo:paragraph-rsid="001aa0e8" style:font-style-asian="normal" style:font-style-complex="normal"/>
    </style:style>
    <style:style style:name="P21" style:family="paragraph" style:parent-style-name="Table_20_Contents">
      <style:text-properties officeooo:paragraph-rsid="001fef4a"/>
    </style:style>
    <style:style style:name="P22" style:family="paragraph" style:parent-style-name="Standard" style:list-style-name="L3">
      <style:text-properties fo:font-style="normal" officeooo:rsid="0020914e" officeooo:paragraph-rsid="0020914e" style:font-style-asian="normal" style:font-style-complex="normal"/>
    </style:style>
    <style:style style:name="P23" style:family="paragraph" style:parent-style-name="Standard" style:list-style-name="L3">
      <style:text-properties fo:font-style="normal" officeooo:rsid="0020c11a" officeooo:paragraph-rsid="0020c11a" style:font-style-asian="normal" style:font-style-complex="normal"/>
    </style:style>
    <style:style style:name="P24" style:family="paragraph" style:parent-style-name="Standard" style:list-style-name="L3">
      <style:text-properties fo:font-style="normal" officeooo:rsid="0021df8b" officeooo:paragraph-rsid="0021df8b" style:font-style-asian="normal" style:font-style-complex="normal"/>
    </style:style>
    <style:style style:name="P25" style:family="paragraph" style:parent-style-name="Standard" style:list-style-name="L3">
      <style:text-properties fo:font-style="normal" officeooo:rsid="0054b77c" officeooo:paragraph-rsid="0054b77c" style:font-style-asian="normal" style:font-style-complex="normal"/>
    </style:style>
    <style:style style:name="P26" style:family="paragraph" style:parent-style-name="Standard">
      <style:text-properties officeooo:paragraph-rsid="0021df8b"/>
    </style:style>
    <style:style style:name="P27" style:family="paragraph" style:parent-style-name="Table_20_Contents">
      <style:text-properties officeooo:paragraph-rsid="00278413"/>
    </style:style>
    <style:style style:name="P28" style:family="paragraph" style:parent-style-name="Standard" style:list-style-name="L4"/>
    <style:style style:name="P29" style:family="paragraph" style:parent-style-name="Table_20_Contents">
      <style:text-properties officeooo:paragraph-rsid="00269302"/>
    </style:style>
    <style:style style:name="P30" style:family="paragraph" style:parent-style-name="Standard" style:list-style-name="L5">
      <style:text-properties officeooo:rsid="0004889c" officeooo:paragraph-rsid="00269302"/>
    </style:style>
    <style:style style:name="P31" style:family="paragraph" style:parent-style-name="Standard" style:list-style-name="L5">
      <style:text-properties officeooo:rsid="0030ee69" officeooo:paragraph-rsid="0030ee69"/>
    </style:style>
    <style:style style:name="P32" style:family="paragraph" style:parent-style-name="Standard" style:list-style-name="L5">
      <style:text-properties officeooo:rsid="003c643e" officeooo:paragraph-rsid="003c643e"/>
    </style:style>
    <style:style style:name="P33" style:family="paragraph" style:parent-style-name="Standard">
      <style:text-properties officeooo:paragraph-rsid="00269302"/>
    </style:style>
    <style:style style:name="P34" style:family="paragraph" style:parent-style-name="Standard">
      <style:text-properties officeooo:rsid="0004889c" officeooo:paragraph-rsid="00269302"/>
    </style:style>
    <style:style style:name="P35" style:family="paragraph" style:parent-style-name="Standard" style:list-style-name="L6">
      <style:text-properties officeooo:rsid="0034c1b5" officeooo:paragraph-rsid="0034c1b5"/>
    </style:style>
    <style:style style:name="P36" style:family="paragraph" style:parent-style-name="Standard">
      <style:text-properties officeooo:rsid="0034c1b5" officeooo:paragraph-rsid="0034c1b5"/>
    </style:style>
    <style:style style:name="P37" style:family="paragraph" style:parent-style-name="Table_20_Contents">
      <style:text-properties officeooo:paragraph-rsid="0034c1b5"/>
    </style:style>
    <style:style style:name="P38" style:family="paragraph" style:parent-style-name="Standard" style:list-style-name="L7">
      <style:text-properties officeooo:rsid="0034c1b5" officeooo:paragraph-rsid="0034c1b5"/>
    </style:style>
    <style:style style:name="P39" style:family="paragraph" style:parent-style-name="Table_20_Contents">
      <style:text-properties officeooo:paragraph-rsid="00363144"/>
    </style:style>
    <style:style style:name="P40" style:family="paragraph" style:parent-style-name="Standard" style:list-style-name="L8">
      <style:text-properties officeooo:rsid="006c4121" officeooo:paragraph-rsid="006c4121"/>
    </style:style>
    <style:style style:name="P41" style:family="paragraph" style:parent-style-name="Standard" style:list-style-name="L8">
      <style:text-properties officeooo:paragraph-rsid="0064e21d"/>
    </style:style>
    <style:style style:name="P42" style:family="paragraph" style:parent-style-name="Standard" style:list-style-name="L8">
      <style:text-properties officeooo:rsid="004a1526" officeooo:paragraph-rsid="0061c2a7"/>
    </style:style>
    <style:style style:name="P43" style:family="paragraph" style:parent-style-name="Standard" style:list-style-name="L8">
      <style:text-properties fo:font-style="normal" officeooo:rsid="004a48bc" officeooo:paragraph-rsid="0061c2a7" style:font-style-asian="normal" style:font-style-complex="normal"/>
    </style:style>
    <style:style style:name="P44" style:family="paragraph" style:parent-style-name="Standard" style:list-style-name="L8">
      <style:text-properties fo:font-style="normal" officeooo:rsid="004ed68a" officeooo:paragraph-rsid="004ed68a" style:font-style-asian="normal" style:font-style-complex="normal"/>
    </style:style>
    <style:style style:name="P45" style:family="paragraph" style:parent-style-name="Standard" style:list-style-name="L8">
      <style:text-properties fo:font-style="normal" officeooo:rsid="0059726d" officeooo:paragraph-rsid="0059726d" style:font-style-asian="normal" style:font-style-complex="normal"/>
    </style:style>
    <style:style style:name="P46" style:family="paragraph" style:parent-style-name="Standard" style:list-style-name="L8">
      <style:text-properties fo:font-style="normal" officeooo:rsid="005a80d5" officeooo:paragraph-rsid="005a80d5" style:font-style-asian="normal" style:font-style-complex="normal"/>
    </style:style>
    <style:style style:name="P47" style:family="paragraph" style:parent-style-name="Standard" style:list-style-name="L8">
      <style:text-properties fo:font-style="normal" officeooo:rsid="005bdaa7" officeooo:paragraph-rsid="005bdaa7" style:font-style-asian="normal" style:font-style-complex="normal"/>
    </style:style>
    <style:style style:name="P48" style:family="paragraph" style:parent-style-name="Standard">
      <style:text-properties officeooo:rsid="0004889c" officeooo:paragraph-rsid="00363144"/>
    </style:style>
    <style:style style:name="P49" style:family="paragraph" style:parent-style-name="Table_20_Contents">
      <style:text-properties officeooo:paragraph-rsid="006e44d7"/>
    </style:style>
    <style:style style:name="P50" style:family="paragraph" style:parent-style-name="Standard" style:list-style-name="L9">
      <style:text-properties officeooo:rsid="006e44d7" officeooo:paragraph-rsid="006e44d7"/>
    </style:style>
    <style:style style:name="P51" style:family="paragraph" style:parent-style-name="Standard">
      <style:text-properties officeooo:rsid="006e44d7" officeooo:paragraph-rsid="006e44d7"/>
    </style:style>
    <style:style style:name="P52" style:family="paragraph" style:parent-style-name="Table_20_Contents">
      <style:text-properties officeooo:rsid="0073163f" officeooo:paragraph-rsid="0073163f"/>
    </style:style>
    <style:style style:name="P53" style:family="paragraph" style:parent-style-name="Table_20_Contents">
      <style:text-properties officeooo:rsid="0079b6a0" officeooo:paragraph-rsid="0079b6a0"/>
    </style:style>
    <style:style style:name="P54" style:family="paragraph" style:parent-style-name="Table_20_Contents">
      <style:text-properties officeooo:rsid="007b969b" officeooo:paragraph-rsid="007b969b"/>
    </style:style>
    <style:style style:name="P55" style:family="paragraph" style:parent-style-name="Table_20_Contents">
      <style:text-properties officeooo:rsid="007d603b" officeooo:paragraph-rsid="007d603b"/>
    </style:style>
    <style:style style:name="P56" style:family="paragraph" style:parent-style-name="Table_20_Contents">
      <style:text-properties officeooo:rsid="007f81db" officeooo:paragraph-rsid="007f81db"/>
    </style:style>
    <style:style style:name="P57" style:family="paragraph" style:parent-style-name="Table_20_Contents">
      <style:text-properties officeooo:rsid="008141df" officeooo:paragraph-rsid="008141df"/>
    </style:style>
    <style:style style:name="P58" style:family="paragraph" style:parent-style-name="Standard" style:list-style-name="L10">
      <style:text-properties officeooo:rsid="008162f8" officeooo:paragraph-rsid="008162f8"/>
    </style:style>
    <style:style style:name="P59" style:family="paragraph" style:parent-style-name="Standard">
      <style:text-properties officeooo:rsid="008162f8" officeooo:paragraph-rsid="008162f8"/>
    </style:style>
    <style:style style:name="P60" style:family="paragraph" style:parent-style-name="Table_20_Contents">
      <style:text-properties officeooo:paragraph-rsid="008e0910"/>
    </style:style>
    <style:style style:name="T1" style:family="text">
      <style:text-properties officeooo:rsid="000aba8a"/>
    </style:style>
    <style:style style:name="T2" style:family="text">
      <style:text-properties fo:background-color="#fff5ce" loext:char-shading-value="0"/>
    </style:style>
    <style:style style:name="T3" style:family="text">
      <style:text-properties officeooo:rsid="000bfb1a"/>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07a8f1" style:font-style-asian="normal" style:font-style-complex="normal"/>
    </style:style>
    <style:style style:name="T7" style:family="text">
      <style:text-properties fo:font-style="italic" officeooo:rsid="0007a8f1" style:font-style-asian="italic" style:font-style-complex="italic"/>
    </style:style>
    <style:style style:name="T8" style:family="text">
      <style:text-properties fo:font-style="normal" officeooo:rsid="0051e7b8" style:font-style-asian="normal" style:font-style-complex="normal"/>
    </style:style>
    <style:style style:name="T9" style:family="text">
      <style:text-properties fo:font-style="normal" officeooo:rsid="00521746" style:font-style-asian="normal" style:font-style-complex="normal"/>
    </style:style>
    <style:style style:name="T10" style:family="text">
      <style:text-properties officeooo:rsid="000fef83"/>
    </style:style>
    <style:style style:name="T11" style:family="text">
      <style:text-properties officeooo:rsid="00134b14"/>
    </style:style>
    <style:style style:name="T12" style:family="text">
      <style:text-properties officeooo:rsid="00165408"/>
    </style:style>
    <style:style style:name="T13" style:family="text">
      <style:text-properties officeooo:rsid="001fef4a"/>
    </style:style>
    <style:style style:name="T14" style:family="text">
      <style:text-properties officeooo:rsid="00201a39"/>
    </style:style>
    <style:style style:name="T15" style:family="text">
      <style:text-properties officeooo:rsid="0022f3f0"/>
    </style:style>
    <style:style style:name="T16" style:family="text">
      <style:text-properties officeooo:rsid="00391856"/>
    </style:style>
    <style:style style:name="T17" style:family="text">
      <style:text-properties officeooo:rsid="0039222d"/>
    </style:style>
    <style:style style:name="T18" style:family="text">
      <style:text-properties style:text-position="super 58%"/>
    </style:style>
    <style:style style:name="T19" style:family="text">
      <style:text-properties officeooo:rsid="00393042"/>
    </style:style>
    <style:style style:name="T20" style:family="text">
      <style:text-properties officeooo:rsid="00567cfc"/>
    </style:style>
    <style:style style:name="T21" style:family="text">
      <style:text-properties officeooo:rsid="002dc2b8"/>
    </style:style>
    <style:style style:name="T22" style:family="text">
      <style:text-properties style:text-position="33% 80%"/>
    </style:style>
    <style:style style:name="T23" style:family="text">
      <style:text-properties fo:font-style="italic"/>
    </style:style>
    <style:style style:name="T24" style:family="text">
      <style:text-properties officeooo:rsid="002c69db"/>
    </style:style>
    <style:style style:name="T25" style:family="text">
      <style:text-properties officeooo:rsid="003b6061"/>
    </style:style>
    <style:style style:name="T26" style:family="text">
      <style:text-properties fo:background-color="#ffff00" loext:char-shading-value="0"/>
    </style:style>
    <style:style style:name="T27" style:family="text">
      <style:text-properties officeooo:rsid="0004889c"/>
    </style:style>
    <style:style style:name="T28" style:family="text">
      <style:text-properties officeooo:rsid="004d1ba8"/>
    </style:style>
    <style:style style:name="T29" style:family="text">
      <style:text-properties officeooo:rsid="004d3d32"/>
    </style:style>
    <style:style style:name="T30" style:family="text">
      <style:text-properties fo:font-style="normal" officeooo:rsid="0053e3de" style:font-style-asian="normal" style:font-style-complex="normal"/>
    </style:style>
    <style:style style:name="T31" style:family="text">
      <style:text-properties fo:font-style="normal" officeooo:rsid="00650b7b" style:font-style-asian="normal" style:font-style-complex="normal"/>
    </style:style>
    <style:style style:name="T32" style:family="text">
      <style:text-properties fo:font-style="normal" officeooo:rsid="004ed68a" style:font-style-asian="normal" style:font-style-complex="normal"/>
    </style:style>
    <style:style style:name="T33" style:family="text">
      <style:text-properties style:text-position="super 58%" fo:font-style="normal" style:font-style-asian="normal" style:font-style-complex="normal"/>
    </style:style>
    <style:style style:name="T34" style:family="text">
      <style:text-properties fo:font-style="normal" officeooo:rsid="005f6399" style:font-style-asian="normal" style:font-style-complex="normal"/>
    </style:style>
    <style:style style:name="T35" style:family="text">
      <style:text-properties fo:font-style="normal" officeooo:rsid="0061c2a7" style:font-style-asian="normal" style:font-style-complex="normal"/>
    </style:style>
    <style:style style:name="T36" style:family="text">
      <style:text-properties fo:font-style="normal" officeooo:rsid="00602138" style:font-style-asian="normal" style:font-style-complex="normal"/>
    </style:style>
    <style:style style:name="T37" style:family="text">
      <style:text-properties style:text-position="super 58%" fo:font-style="normal" officeooo:rsid="00602138" style:font-style-asian="normal" style:font-style-complex="normal"/>
    </style:style>
    <style:style style:name="T38" style:family="text">
      <style:text-properties officeooo:rsid="004ed68a"/>
    </style:style>
    <style:style style:name="T39" style:family="text">
      <style:text-properties officeooo:rsid="005f6399"/>
    </style:style>
    <style:style style:name="T40" style:family="text">
      <style:text-properties officeooo:rsid="0061c2a7"/>
    </style:style>
    <style:style style:name="T41" style:family="text">
      <style:text-properties officeooo:rsid="00602138"/>
    </style:style>
    <style:style style:name="T42" style:family="text">
      <style:text-properties style:text-position="super 58%" officeooo:rsid="00602138"/>
    </style:style>
    <style:style style:name="T43" style:family="text">
      <style:text-properties officeooo:rsid="005242d7"/>
    </style:style>
    <style:style style:name="T44" style:family="text">
      <style:text-properties officeooo:rsid="0065d791"/>
    </style:style>
    <style:style style:name="T45" style:family="text">
      <style:text-properties officeooo:rsid="005aaea4"/>
    </style:style>
    <style:style style:name="T46" style:family="text">
      <style:text-properties officeooo:rsid="00637972"/>
    </style:style>
    <style:style style:name="T47" style:family="text">
      <style:text-properties officeooo:rsid="005c0236"/>
    </style:style>
    <style:style style:name="T48" style:family="text">
      <style:text-properties officeooo:rsid="005d2950"/>
    </style:style>
    <style:style style:name="T49" style:family="text">
      <style:text-properties officeooo:rsid="00689e61"/>
    </style:style>
    <style:style style:name="T50" style:family="text">
      <style:text-properties fo:font-style="italic" officeooo:rsid="005d2950" style:font-style-asian="italic" style:font-style-complex="italic"/>
    </style:style>
    <style:style style:name="T51" style:family="text">
      <style:text-properties officeooo:rsid="006fcc4d"/>
    </style:style>
    <style:style style:name="T52" style:family="text">
      <style:text-properties officeooo:rsid="00706371"/>
    </style:style>
    <style:style style:name="T53" style:family="text">
      <style:text-properties fo:background-color="#ffbf00" loext:char-shading-value="0"/>
    </style:style>
    <style:style style:name="T54" style:family="text">
      <style:text-properties fo:background-color="#ffdbb6" loext:char-shading-value="0"/>
    </style:style>
    <style:style style:name="T55" style:family="text">
      <style:text-properties officeooo:rsid="00747133"/>
    </style:style>
    <style:style style:name="T56" style:family="text">
      <style:text-properties officeooo:rsid="007d603b"/>
    </style:style>
    <style:style style:name="T57" style:family="text">
      <style:text-properties officeooo:rsid="00859fc2"/>
    </style:style>
    <style:style style:name="T58" style:family="text">
      <style:text-properties officeooo:rsid="0086dcf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Ahaziah 22 or 42 when he began to reign?</text:p>
      <text:p text:style-name="P2"/>
      <table:table table:name="Table3" table:style-name="Table3">
        <table:table-column table:style-name="Table3.A"/>
        <table:table-row>
          <table:table-cell table:style-name="Table3.A1" office:value-type="string">
            <text:p text:style-name="P3">2 Kings 8:24-2<text:span text:style-name="T1">9</text:span></text:p>
            <text:p text:style-name="P3">24 And Joram slept with his fathers, and was buried with his fathers in the city of David: and Ahaziah his son reigned in his stead.</text:p>
            <text:p text:style-name="P3">25 <text:span text:style-name="T2">In the twelfth year of Joram the son of Ahab</text:span> king of Israel did <text:span text:style-name="T2">Ahaziah the son of Jehoram</text:span> king of Judah begin to reign.</text:p>
            <text:p text:style-name="P3">26 <text:span text:style-name="T2">Two and twenty years old was Ahaziah when he began to reign</text:span>; and he reigned one year in Jerusalem. And his mother's name was Athaliah, the daughter of Omri king of Israel.</text:p>
            <text:p text:style-name="P3">27 And he walked in the way of the house of Ahab, and did evil in the sight of the LORD, as did the house of Ahab: for <text:span text:style-name="T2">he was the son in law of the house of Ahab</text:span>.</text:p>
            <text:p text:style-name="P3">28 And <text:span text:style-name="T2">he went with Joram the son of Ahab to the war against Hazael king of Syria</text:span> in Ramoth-gilead; and the Syrians wounded Joram.</text:p>
            <text:p text:style-name="P3">29 And king Joram went back to be healed in Jezreel of the wounds which the Syrians had given him at Ramah, when he fought against Hazael king of Syria. And <text:span text:style-name="T2">Ahaziah the son of Jehoram king of Judah went down to see Joram</text:span> the son of Ahab in Jezreel, because he was sick.</text:p>
          </table:table-cell>
        </table:table-row>
      </table:table>
      <text:list text:style-name="L1">
        <text:list-item>
          <text:p text:style-name="P4">The first Ahaziah we see (excluding Ahaziah son of Ahab king of Israel) is 22 when he <text:span text:style-name="T3">begins</text:span> to reign.</text:p>
        </text:list-item>
        <text:list-item>
          <text:p text:style-name="P5"><text:span text:style-name="T4">He is the son of both Jehoram and Athaliah and also the son in law </text:span><text:span text:style-name="T5">of</text:span><text:span text:style-name="T4"> the house of Ahab </text:span><text:span text:style-name="T6">(meaning, the son in law </text:span><text:span text:style-name="T7">from</text:span><text:span text:style-name="T6"> the house of Ahab). </text:span><text:span text:style-name="T8">Son in law to who then? </text:span><text:span text:style-name="T9">To Jehoram.</text:span></text:p>
        </text:list-item>
        <text:list-item>
          <text:p text:style-name="P6">This Ahaziah went with Jora<text:span text:style-name="T10">m</text:span> the son of Ahab <text:span text:style-name="T10">king of Israel </text:span>to war against Hazael king of Syria.</text:p>
          <text:list>
            <text:list-item>
              <text:p text:style-name="P7">And he went to visit Joram after the battle.</text:p>
            </text:list-item>
          </text:list>
        </text:list-item>
      </text:list>
      <text:p text:style-name="P8"/>
      <text:p text:style-name="P8"/>
      <table:table table:name="Table4" table:style-name="Table4">
        <table:table-column table:style-name="Table4.A"/>
        <table:table-row>
          <table:table-cell table:style-name="Table4.A1" office:value-type="string">
            <text:p text:style-name="P9">2 Kings 9:16</text:p>
            <text:p text:style-name="P9">So Jehu rode in a chariot, and went to Jezreel; for Joram lay there. And <text:span text:style-name="T2">Ahaziah king of Judah was come down to see Joram</text:span>.</text:p>
          </table:table-cell>
        </table:table-row>
      </table:table>
      <text:list text:style-name="L2">
        <text:list-item>
          <text:p text:style-name="P10">In the very next chapter, God annoints Jehu to cut off the house of Ahab and he goes in his chariot to Jezreel, where both Ahaziah &amp; Joram are.</text:p>
        </text:list-item>
      </text:list>
      <text:p text:style-name="P11"/>
      <text:p text:style-name="P11"/>
      <table:table table:name="Table5" table:style-name="Table5">
        <table:table-column table:style-name="Table5.A"/>
        <table:table-row>
          <table:table-cell table:style-name="Table5.A1" office:value-type="string">
            <text:p text:style-name="P12">2 Kings 9:22-25</text:p>
            <text:p text:style-name="P12">22 And it came to pass, when <text:span text:style-name="T2">Joram</text:span> saw Jehu, that he said, Is it peace, Jehu? And he answered, What peace, so long as the whoredoms of thy mother Jezebel and her witchcrafts are so many?</text:p>
            <text:p text:style-name="P12">23 And <text:span text:style-name="T2">Joram</text:span> turned his hands, and fled, and said to <text:span text:style-name="T2">Ahaziah</text:span>, There is treachery, O <text:span text:style-name="T2">Ahaziah</text:span>.</text:p>
            <text:p text:style-name="P12">24 And Jehu drew a bow with his full strength, and smote <text:span text:style-name="T2">Jehoram</text:span> between his arms, and the arrow went out at his heart, and he sunk down in his chariot.</text:p>
            <text:p text:style-name="P13">25 Then said <text:span text:style-name="T2">Jehu</text:span> to Bidkar his captain, Take up, and cast him in the portion of the field of Naboth the Jezreelite: for remember how that, when I and thou rode together after <text:span text:style-name="T2">Ahab his father</text:span>, the LORD laid this </text:p>
            <text:p text:style-name="P13">burden upon him;</text:p>
          </table:table-cell>
        </table:table-row>
      </table:table>
      <text:list text:continue-numbering="true" text:style-name="L2">
        <text:list-item>
          <text:p text:style-name="P14">Ahaziah and Joram/<text:span text:style-name="T11">Jehoram</text:span> are still together when Jehu kills Joram <text:span text:style-name="T12">(who is also called Jehoram here).</text:span></text:p>
        </text:list-item>
      </text:list>
      <text:p text:style-name="P15"/>
      <text:p text:style-name="P15"/>
      <text:p text:style-name="P15"/>
      <text:p text:style-name="P15"/>
      <text:p text:style-name="P15"/>
      <text:p text:style-name="P15"/>
      <text:p text:style-name="P15"/>
      <text:p text:style-name="P15"/>
      <text:p text:style-name="P15"/>
      <text:p text:style-name="P15"/>
      <table:table table:name="Table6" table:style-name="Table6">
        <table:table-column table:style-name="Table6.A"/>
        <text:soft-page-break/>
        <table:table-row>
          <table:table-cell table:style-name="Table6.A1" office:value-type="string">
            <text:p text:style-name="P16">2 Kings 9:2<text:span text:style-name="T13">8</text:span></text:p>
            <text:p text:style-name="P16">27 But when <text:span text:style-name="T2">Ahaziah</text:span> the king of Judah saw this, he fled by the way of the garden house. And Jehu followed after him, and said, Smite him also in the chariot. And they did so at the going up to Gur, which is by Ibleam. And he fled to Megiddo, and died there.</text:p>
          </table:table-cell>
        </table:table-row>
      </table:table>
      <text:list text:continue-numbering="true" text:style-name="L2">
        <text:list-item>
          <text:p text:style-name="P17">When Ahaziah saw Jehu kill Joram/Jehoram he fled.</text:p>
          <text:list>
            <text:list-item>
              <text:p text:style-name="P18">First, almost to Ibleam (the ascent to Gur is just north of Ibleam) which is ~7.7miles south of Jezreel.</text:p>
            </text:list-item>
            <text:list-item>
              <text:p text:style-name="P18">Then, he fled to Megiddo and died there (which is ~11.3 miles northwest of Ibleam and ~8.6 miles west of Jezreel).</text:p>
            </text:list-item>
          </text:list>
        </text:list-item>
      </text:list>
      <text:p text:style-name="P19"/>
      <text:p text:style-name="P20"><draw:frame draw:style-name="fr1" draw:name="Image1" text:anchor-type="as-char" svg:width="6.5984in" svg:height="5.8071in" draw:z-index="0"><draw:image xlink:href="Pictures/100000010000041A0000039CDC8BDD2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7" table:style-name="Table7">
        <table:table-column table:style-name="Table7.A"/>
        <text:soft-page-break/>
        <table:table-row>
          <table:table-cell table:style-name="Table7.A1" office:value-type="string">
            <text:p text:style-name="P21">2 Kings 9:28,<text:span text:style-name="T14">29</text:span></text:p>
            <text:p text:style-name="P21"><text:span text:style-name="T14">28 </text:span>And his servants carried him in a chariot to Jerusalem, and buried him in his sepulchre with his fathers in the city of David.</text:p>
            <text:p text:style-name="P21">29 And in the eleventh year of Joram the son of Ahab began <text:span text:style-name="T2">Ahaziah</text:span> to reign over Judah.</text:p>
          </table:table-cell>
        </table:table-row>
      </table:table>
      <text:list text:style-name="L3">
        <text:list-item>
          <text:p text:style-name="P22">Notice that <text:span text:style-name="T15">right </text:span>after the Ahaziah the son of Jehoram dies in Megiddo, we read about <text:span text:style-name="T16">an </text:span>Ahaziah <text:span text:style-name="T17">whose</text:span> reign <text:span text:style-name="T17">began </text:span>in the 11<text:span text:style-name="T18">th</text:span> year of Joram the son of Ahab.</text:p>
          <text:list>
            <text:list-item>
              <text:p text:style-name="P23"><text:span text:style-name="T19">We were just told in </text:span>2Ki 8:25 <text:span text:style-name="T19">that </text:span>the previous Ahaziah that was just killed began to reign in the 12<text:span text:style-name="T18">th</text:span> year of Joram the son of Ahab.</text:p>
            </text:list-item>
            <text:list-item>
              <text:p text:style-name="P24">Thus, we are introduced to a second Ahaziah that began to reign <text:span text:style-name="T5">before</text:span> Ahaziah son of Jehoram.</text:p>
            </text:list-item>
          </text:list>
        </text:list-item>
        <text:list-item>
          <text:p text:style-name="P25">From the 11<text:span text:style-name="T18">th</text:span> year of Joram the son of Ahab to the 12<text:span text:style-name="T18">th</text:span> year is one year: <text:span text:style-name="T20">therefore, </text:span>the Ahaziah in 2Ki 8:25 and 2Ki 9:29 cannot be the same man because 20 years separate their age at the beginning of their reigns (2Ch 22:2).</text:p>
        </text:list-item>
      </text:list>
      <text:p text:style-name="P26"/>
      <text:p text:style-name="P26"/>
      <table:table table:name="Table1" table:style-name="Table1">
        <table:table-column table:style-name="Table1.A"/>
        <table:table-row>
          <table:table-cell table:style-name="Table1.A1" office:value-type="string">
            <text:p text:style-name="P27">2 Chronicles 17:7-9,<text:span text:style-name="T21">12</text:span><text:line-break/><text:span text:style-name="T22">7</text:span> Also in the third year of his reign he sent to his princes, <text:span text:style-name="T23">even</text:span> to Ben-hail, and to Obadiah, and to Zechariah, and to Nethaneel, and to Michaiah, to teach in the cities of Judah. <text:line-break/><text:span text:style-name="T22">8</text:span> And with them <text:span text:style-name="T23">he sent</text:span> Levites, <text:span text:style-name="T23">even</text:span> Shemaiah, and Nethaniah, and Zebadiah, and Asahel, and Shemiramoth, and Jehonathan, and Adonijah, and Tobijah, and Tob-adonijah, Levites; and with them Elishama and Jehoram, priests. <text:line-break/><text:span text:style-name="T22">9</text:span> And they taught in Judah, and <text:span text:style-name="T23">had</text:span> the book of the law of the LORD with them, and went about throughout all the cities of Judah, and taught the people.</text:p>
            <text:p text:style-name="P27"><text:span text:style-name="T18">12</text:span> And Jehoshaphat waxed great exceedingly; and he built in Judah castles, and cities of store.</text:p>
          </table:table-cell>
        </table:table-row>
      </table:table>
      <text:list text:style-name="L4">
        <text:list-item>
          <text:p text:style-name="P28">Jehoshaphat sent some of his princes and Levites throughout Judah to teach <text:span text:style-name="T24">from the book of the law of the LORD.</text:span></text:p>
        </text:list-item>
      </text:list>
      <text:p text:style-name="Standard"/>
      <text:p text:style-name="Standard"/>
      <table:table table:name="Table8" table:style-name="Table8">
        <table:table-column table:style-name="Table8.A"/>
        <table:table-row>
          <table:table-cell table:style-name="Table8.A1" office:value-type="string">
            <text:p text:style-name="P29">2 Chronicles 18:1-2<text:line-break/><text:span text:style-name="T22">1</text:span> Now <text:span text:style-name="T2">Jehoshaphat</text:span> had riches and honour in abundance, and joined <text:span text:style-name="T2">affinity</text:span> with Ahab. <text:line-break/><text:span text:style-name="T22">2</text:span> And after <text:span text:style-name="T23">certain</text:span> years he went down to Ahab to Samaria. And Ahab killed sheep and oxen for him in abundance, and for the people that <text:span text:style-name="T23">he had</text:span> with him, and persuaded him to go up <text:span text:style-name="T23">with him</text:span> to Ramoth-gilead.</text:p>
          </table:table-cell>
        </table:table-row>
      </table:table>
      <text:list text:style-name="L5">
        <text:list-item>
          <text:p text:style-name="P30">Joining affinity is an alliance through marriage <text:span text:style-name="T25">(study the word affinity &amp; H2859).</text:span></text:p>
        </text:list-item>
        <text:list-item>
          <text:p text:style-name="P31">After certain years Jehoshaphat goes and visits Ahab and Ahab hosts a large feast for Jehoshaphat and the people that he had with him.</text:p>
        </text:list-item>
        <text:list-item>
          <text:p text:style-name="P32">Might that have been a wedding feast?</text:p>
        </text:list-item>
      </text:list>
      <text:p text:style-name="P33"/>
      <text:p text:style-name="P34"/>
      <table:table table:name="Table9" table:style-name="Table9">
        <table:table-column table:style-name="Table9.A"/>
        <table:table-row>
          <table:table-cell table:style-name="Table9.A1" office:value-type="string">
            <text:p text:style-name="Table_20_Contents">2 Chronicles 19:1-2<text:line-break/><text:span text:style-name="T22">1</text:span> And Jehoshaphat the king of Judah returned to his house in peace to Jerusalem. <text:line-break/><text:span text:style-name="T22">2</text:span> And Jehu the son of Hanani the seer went out to meet him, and said to king Jehoshaphat, Shouldest thou help the ungodly, and love them that hate the LORD? therefore <text:span text:style-name="T23">is</text:span> wrath upon thee from before the LORD.</text:p>
          </table:table-cell>
        </table:table-row>
      </table:table>
      <text:list text:style-name="L6">
        <text:list-item>
          <text:p text:style-name="P35">After the battle with Syria where Ahab dies, Jehoshaphat is rebuked.</text:p>
        </text:list-item>
      </text:list>
      <text:p text:style-name="P36"/>
      <text:p text:style-name="P36"/>
      <table:table table:name="Table10" table:style-name="Table10">
        <table:table-column table:style-name="Table10.A"/>
        <table:table-row>
          <table:table-cell table:style-name="Table10.A1" office:value-type="string">
            <text:p text:style-name="P37">2 Chronicles 19:4</text:p>
            <text:p text:style-name="P37">And Jehoshaphat dwelt at Jerusalem: and he went out again through the people from Beer-sheba to mount Ephraim, and brought them back unto the LORD God of their fathers.</text:p>
          </table:table-cell>
        </table:table-row>
      </table:table>
      <text:list text:style-name="L7">
        <text:list-item>
          <text:p text:style-name="P38"><text:soft-page-break/>And then he goes on another missionary journey throughout Judah, Benjamin, and Ephraim.</text:p>
        </text:list-item>
      </text:list>
      <text:p text:style-name="P36"/>
      <table:table table:name="Table2" table:style-name="Table2">
        <table:table-column table:style-name="Table2.A"/>
        <table:table-row>
          <table:table-cell table:style-name="Table2.A1" office:value-type="string">
            <text:p text:style-name="P39">2 Chronicles 21:1-4</text:p>
            <text:p text:style-name="P39">1 Now Jehoshaphat slept with his fathers, and was buried with his fathers in the city of David. And <text:span text:style-name="T2">Jehoram his son</text:span> reigned in his stead.</text:p>
            <text:p text:style-name="P39">2 And <text:span text:style-name="T2">he</text:span> had brethren <text:span text:style-name="T2">the sons of Jehoshaphat</text:span>, <text:span text:style-name="T2">Azariah</text:span>, and Jehiel, and Zechariah, and <text:span text:style-name="T2">Azariah</text:span>, and Michael, and Shephatiah: all these were the sons of <text:span text:style-name="T26">Jehoshaphat king of Israel</text:span>.</text:p>
            <text:p text:style-name="P39">3 And their father gave them great gifts of silver, and of gold, and of precious things, with fenced cities in Judah: but the kingdom gave he to Jehoram; because he was the firstborn.</text:p>
            <text:p text:style-name="P39">4 Now <text:span text:style-name="T2">when Jehoram was risen up to the kingdom of his father</text:span>, he strengthened himself, and <text:span text:style-name="T2">slew </text:span><text:span text:style-name="T26">all</text:span><text:span text:style-name="T2"> his brethren</text:span> with the sword, and <text:span text:style-name="T26">divers also of the princes of Israel</text:span>.</text:p>
          </table:table-cell>
        </table:table-row>
      </table:table>
      <text:list text:style-name="L8">
        <text:list-item>
          <text:p text:style-name="P40">This is the only time that Jehoshephat king of Judah is called “king of Israel”.</text:p>
        </text:list-item>
        <text:list-item>
          <text:p text:style-name="P41"><text:span text:style-name="T27">Those brethern </text:span><text:span text:style-name="T28">of Jehoram </text:span><text:span text:style-name="T27">were slain </text:span><text:span text:style-name="T29">shortly after </text:span><text:span text:style-name="T27">when </text:span><text:span text:style-name="T28">he</text:span><text:span text:style-name="T27"> became king. </text:span><text:span text:style-name="T30">This is a typical power move that ungodly men use to solidify their right to the throne </text:span><text:span text:style-name="T31">(kill all the other candidates).</text:span></text:p>
          <text:list>
            <text:list-item>
              <text:p text:style-name="P42"><text:span text:style-name="T4">The </text:span><text:span text:style-name="T32">Ahaziah</text:span><text:span text:style-name="T4"> in 2Ki 8:25 began to reign in the 7</text:span><text:span text:style-name="T33">th</text:span><text:span text:style-name="T4"> year of Jehoram </text:span><text:span text:style-name="T34">king of Judah’s</text:span><text:span text:style-name="T4"> reign.</text:span></text:p>
              <text:list>
                <text:list-item>
                  <text:p text:style-name="P42"><text:span text:style-name="T35">T</text:span><text:span text:style-name="T36">he 12</text:span><text:span text:style-name="T37">th</text:span><text:span text:style-name="T36"> year of Jehoram king of Israel’s reign.</text:span></text:p>
                </text:list-item>
              </text:list>
            </text:list-item>
            <text:list-item>
              <text:p text:style-name="P43">The <text:span text:style-name="T38">Ahaziah</text:span> in 2Ki 9:29 began to reign in the 6<text:span text:style-name="T18">th</text:span> year of Jehoram <text:span text:style-name="T39">king of Judah’s</text:span> reign.</text:p>
              <text:list>
                <text:list-item>
                  <text:p text:style-name="P43"><text:span text:style-name="T40">T</text:span><text:span text:style-name="T41">he 11</text:span><text:span text:style-name="T42">th</text:span><text:span text:style-name="T41"> year of Jehoram king of Israel’s reign.</text:span></text:p>
                </text:list-item>
              </text:list>
            </text:list-item>
            <text:list-item>
              <text:p text:style-name="P44">The Ahaziah in 2Ch 22:2 <text:span text:style-name="T43">(42yrs old) </text:span>cannot be Jehoram’s <text:span text:style-name="T5">biological</text:span> son.</text:p>
              <text:list>
                <text:list-item>
                  <text:p text:style-name="P45">Jehoram <text:span text:style-name="T44">king of Judah </text:span>began to reign at age 32 in the 5<text:span text:style-name="T18">th</text:span> year of Jehoram king of Israel <text:span text:style-name="T45">who reigned for 12 years </text:span>(2Ki <text:span text:style-name="T45">1:17, 3:1, </text:span>8:16).</text:p>
                </text:list-item>
                <text:list-item>
                  <text:p text:style-name="P46">Jehoram king of Israel began to reign in the 18<text:span text:style-name="T18">th</text:span> year of Jehoshaphat king of Judah <text:span text:style-name="T45">who reigned for 25 years </text:span>(<text:span text:style-name="T45">1Ki 22:42, </text:span>2Ki 3:1, <text:span text:style-name="T45">2Ch 20:31</text:span>).</text:p>
                  <text:list>
                    <text:list-item>
                      <text:p text:style-name="P47">Whether <text:span text:style-name="T46">the </text:span>Ahaziah <text:span text:style-name="T46">in 2Ch 22:2 </text:span>began to reign in the 6<text:span text:style-name="T18">th</text:span> or 7<text:span text:style-name="T18">th</text:span> year of Jehoram king of Judah’s reign (11<text:span text:style-name="T18">th</text:span> or 12<text:span text:style-name="T18">th</text:span> year of Jehoram king of Israel’s reign) <text:span text:style-name="T47">that would put his birth year </text:span><text:span text:style-name="T48">3 </text:span><text:span text:style-name="T49">or</text:span><text:span text:style-name="T48"> 2 years </text:span><text:span text:style-name="T50">before</text:span><text:span text:style-name="T48"> Jehoram king of Judah was born.</text:span></text:p>
                    </text:list-item>
                  </text:list>
                </text:list-item>
              </text:list>
            </text:list-item>
          </text:list>
        </text:list-item>
      </text:list>
      <text:p text:style-name="P48"/>
      <text:p text:style-name="P48"/>
      <table:table table:name="Table11" table:style-name="Table11">
        <table:table-column table:style-name="Table11.A"/>
        <table:table-row>
          <table:table-cell table:style-name="Table11.A1" office:value-type="string">
            <text:p text:style-name="P49">2 Kings 10:4</text:p>
            <text:p text:style-name="P49">But they were exceedingly afraid, and said, Behold, two kings stood not before him: how then shall we stand?</text:p>
          </table:table-cell>
        </table:table-row>
      </table:table>
      <text:list text:style-name="L9">
        <text:list-item>
          <text:p text:style-name="P50">The ruler’s of Jezreel acknowledged that Jehu had killed two kings already (Ahaziah 2Ki 8:25,26, <text:span text:style-name="T51">9:</text:span><text:span text:style-name="T52">27</text:span> <text:span text:style-name="T51">and Joram</text:span> <text:span text:style-name="T51">2Ki </text:span>9:<text:span text:style-name="T51">24).</text:span></text:p>
        </text:list-item>
      </text:list>
      <text:p text:style-name="P51"/>
      <text:p text:style-name="P51"/>
      <table:table table:name="Table12" table:style-name="Table12">
        <table:table-column table:style-name="Table12.A"/>
        <table:table-column table:style-name="Table12.B"/>
        <table:table-column table:style-name="Table12.C"/>
        <table:table-row>
          <table:table-cell table:style-name="Table12.A1" table:number-rows-spanned="3" office:value-type="string">
            <text:p text:style-name="Table_20_Contents">II Chronicles 22:8</text:p>
            <text:p text:style-name="Table_20_Contents">And it came to pass, that, when Jehu was <text:span text:style-name="T26">executing judgment upon the house of Ahab</text:span>, and <text:span text:style-name="T53">found the princes of Judah</text:span>, and <text:span text:style-name="T54">the sons of the brethren of Ahaziah</text:span>, that ministered to Ahaziah, he slew them.</text:p>
          </table:table-cell>
          <table:table-cell table:style-name="Table12.A1" office:value-type="string">
            <text:p text:style-name="P52">2Ki 10:1-<text:span text:style-name="T55">11</text:span></text:p>
          </table:table-cell>
          <table:table-cell table:style-name="Table12.C1" office:value-type="string">
            <text:p text:style-name="P53">Ahab’s house cut off in both Jezreel &amp; Samaria.</text:p>
          </table:table-cell>
        </table:table-row>
        <table:table-row>
          <table:covered-table-cell table:style-name="Table12.A1"/>
          <table:table-cell table:style-name="Table12.B2" office:value-type="string">
            <text:p text:style-name="P54">2Ki 10:12-<text:span text:style-name="T56">14</text:span></text:p>
          </table:table-cell>
          <table:table-cell table:style-name="Table12.C2" office:value-type="string">
            <text:p text:style-name="P55">Jehu goes to Samaria and slays the princes of Judah.</text:p>
          </table:table-cell>
        </table:table-row>
        <table:table-row>
          <table:covered-table-cell table:style-name="Table12.A1"/>
          <table:table-cell table:style-name="Table12.B2" office:value-type="string">
            <text:p text:style-name="P56">2Ki 10:17</text:p>
          </table:table-cell>
          <table:table-cell table:style-name="Table12.C2" office:value-type="string">
            <text:p text:style-name="P57">Jehu slays all that remained unto Ahab in Samaria.</text:p>
          </table:table-cell>
        </table:table-row>
      </table:table>
      <text:list text:style-name="L10">
        <text:list-item>
          <text:p text:style-name="P58">Note that Ahaziah <text:span text:style-name="T57">son of Ahab</text:span> <text:span text:style-name="T58">died from injuries from falling</text:span> before Jehu came on the scene.</text:p>
        </text:list-item>
      </text:list>
      <text:p text:style-name="P59"/>
      <text:p text:style-name="P59"/>
      <table:table table:name="Table13" table:style-name="Table13">
        <table:table-column table:style-name="Table13.A"/>
        <table:table-row>
          <table:table-cell table:style-name="Table13.A1" office:value-type="string">
            <text:p text:style-name="P60">2 Chronicles 24:7</text:p>
            <text:p text:style-name="P60">For the <text:span text:style-name="T54">sons</text:span> of Athaliah, that wicked woman, had broken up the house of God; and also all the dedicated things of the house of the LORD did they bestow upon Baalim.</text:p>
          </table:table-cell>
        </table:table-row>
      </table:table>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4T07:56:10.728406944</meta:creation-date>
    <dc:title>Ahaziah</dc:title>
    <meta:editing-duration>PT19H49M43S</meta:editing-duration>
    <meta:editing-cycles>147</meta:editing-cycles>
    <meta:generator>LibreOffice/26.2.4.2$Linux_X86_64 LibreOffice_project/64a984c51f4702dbd3710b13428c673a2f1292e7</meta:generator>
    <dc:date>2026-07-11T12:20:06.824480546</dc:date>
    <meta:document-statistic meta:table-count="13" meta:image-count="1" meta:object-count="0" meta:page-count="4" meta:paragraph-count="76" meta:word-count="1677" meta:character-count="8655" meta:non-whitespace-character-count="7079"/>
    <meta:template xlink:type="simple" xlink:actuate="onRequest" xlink:title="default" xlink:href="../../../../Templates/default.ott" meta:date="2025-07-24T07:56:10.309852069"/>
  </office:meta>
</office:document-meta>
</file>