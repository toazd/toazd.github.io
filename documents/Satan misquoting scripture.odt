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abriela Nerd Font" svg:font-family="'Gabriela Nerd Font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8.2in" table:align="margins"/>
    </style:style>
    <style:style style:name="Table1.A" style:family="table-column">
      <style:table-column-properties style:column-width="4.1in" style:rel-column-width="32767*"/>
    </style:style>
    <style:style style:name="Table1.B" style:family="table-column">
      <style:table-column-properties style:column-width="4.1in" style:rel-column-width="32768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style:vertical-align="middle"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P1" style:family="paragraph" style:parent-style-name="Table_20_Contents">
      <style:text-properties fo:color="#127622" loext:opacity="100%" style:font-name="Gabriela Nerd Font"/>
    </style:style>
    <style:style style:name="P2" style:family="paragraph" style:parent-style-name="Table_20_Contents">
      <style:text-properties officeooo:paragraph-rsid="001a430a"/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#ffd7d7" loext:char-shading-value="0"/>
    </style:style>
    <style:style style:name="T3" style:family="text">
      <style:text-properties fo:color="#127622" loext:opacity="100%" style:font-name="Gabriela Nerd Font"/>
    </style:style>
    <style:style style:name="T4" style:family="text">
      <style:text-properties style:text-position="33% 80%"/>
    </style:style>
    <style:style style:name="T5" style:family="text">
      <style:text-properties fo:font-style="italic" fo:background-color="#ffff00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Matthew 4:6</text:p>
            <text:p text:style-name="P2">And saith unto him, If thou be the Son of God, cast thyself down: for it is written, <text:span text:style-name="T1">He shall give his angels charge concerning thee</text:span>: and in <text:span text:style-name="T1">their hands they shall bear thee up, lest</text:span> <text:span text:style-name="T2">at any time</text:span> <text:span text:style-name="T1">thou dash thy foot against a stone.</text:span></text:p>
          </table:table-cell>
          <table:table-cell table:style-name="Table1.B1" table:number-rows-spanned="2" office:value-type="string">
            <text:p text:style-name="Table_20_Contents"><text:span text:style-name="T3">Psalms 91:11-12</text:span><text:line-break/><text:span text:style-name="T4">11</text:span> <text:span text:style-name="T1">For he shall give his angels charge over thee, </text:span><text:span text:style-name="T2">to keep thee in all thy ways</text:span>. <text:line-break/><text:span text:style-name="T4">12</text:span> <text:span text:style-name="T1">They shall bear thee up in </text:span><text:span text:style-name="T5">their</text:span><text:span text:style-name="T1"> hands</text:span>, <text:span text:style-name="T1">lest thou</text:span> <text:span text:style-name="T1">dash thy foot against a stone.</text:span></text:p>
          </table:table-cell>
        </table:table-row>
        <table:table-row>
          <table:table-cell table:style-name="Table1.A2" office:value-type="string">
            <text:p text:style-name="Table_20_Contents"><text:span text:style-name="T3">Luke 4:10-11</text:span><text:line-break/><text:span text:style-name="T4">10</text:span> For it is written, <text:span text:style-name="T1">He shall give his angels charge over thee, to keep thee: </text:span><text:line-break/><text:span text:style-name="T4">11</text:span> And in <text:span text:style-name="T5">their</text:span><text:span text:style-name="T1"> hands they shall bear thee up, lest</text:span> <text:span text:style-name="T2">at any time</text:span> thou <text:span text:style-name="T1">dash thy foot against a stone.</text:span></text:p>
          </table:table-cell>
          <table:covered-table-cell table:style-name="Table1.B1"/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abriela Nerd Font" svg:font-family="'Gabriela Nerd Font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15in" fo:margin-bottom="0.15in" fo:margin-left="0.15in" fo:margin-right="0.1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15T07:32:40.724000000</meta:creation-date>
    <meta:editing-duration>PT9M50S</meta:editing-duration>
    <meta:editing-cycles>7</meta:editing-cycles>
    <meta:generator>LibreOffice/26.2.4.2$Linux_X86_64 LibreOffice_project/64a984c51f4702dbd3710b13428c673a2f1292e7</meta:generator>
    <dc:title>BibleStudyTemplate</dc:title>
    <dc:date>2026-07-11T12:30:30.266205431</dc:date>
    <meta:document-statistic meta:table-count="1" meta:image-count="0" meta:object-count="0" meta:page-count="1" meta:paragraph-count="4" meta:word-count="123" meta:character-count="613" meta:non-whitespace-character-count="492"/>
    <meta:template xlink:type="simple" xlink:actuate="onRequest" xlink:title="BibleStudyTemplate" xlink:href="../../../../AppData/Roaming/LibreOffice/4/user/template/BibleStudyTemplate.ott" meta:date="2025-05-15T07:32:39.388000000"/>
  </office:meta>
</office:document-meta>
</file>