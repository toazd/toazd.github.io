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4680e" officeooo:paragraph-rsid="0014680e"/>
    </style:style>
    <style:style style:name="P2" style:family="paragraph" style:parent-style-name="Table_20_Contents">
      <style:text-properties officeooo:paragraph-rsid="0014680e"/>
    </style:style>
    <style:style style:name="P3" style:family="paragraph" style:parent-style-name="Table_20_Contents" style:list-style-name="L1">
      <style:text-properties officeooo:rsid="0014680e" officeooo:paragraph-rsid="0014680e"/>
    </style:style>
    <style:style style:name="P4" style:family="paragraph" style:parent-style-name="Table_20_Contents">
      <style:text-properties officeooo:rsid="0014680e" officeooo:paragraph-rsid="0014680e"/>
    </style:style>
    <style:style style:name="P5" style:family="paragraph" style:parent-style-name="Table_20_Contents" style:list-style-name="L2">
      <style:text-properties officeooo:rsid="0015580f" officeooo:paragraph-rsid="0015580f"/>
    </style:style>
    <style:style style:name="P6" style:family="paragraph" style:parent-style-name="Table_20_Contents" style:list-style-name="L2">
      <style:text-properties officeooo:rsid="0023baac" officeooo:paragraph-rsid="0023baac"/>
    </style:style>
    <style:style style:name="T1" style:family="text">
      <style:text-properties officeooo:rsid="001ba123"/>
    </style:style>
    <style:style style:name="T2" style:family="text">
      <style:text-properties fo:color="#127622" loext:opacity="100%"/>
    </style:style>
    <style:style style:name="T3" style:family="text">
      <style:text-properties style:text-position="33% 80%"/>
    </style:style>
    <style:style style:name="T4" style:family="text">
      <style:text-properties fo:background-color="#fff5ce" loext:char-shading-value="0"/>
    </style:style>
    <style:style style:name="T5" style:family="text">
      <style:text-properties officeooo:rsid="001751a1"/>
    </style:style>
    <style:style style:name="T6" style:family="text">
      <style:text-properties style:use-window-font-color="true" loext:opacity="0%" fo:background-color="#fff5ce" loext:char-shading-value="0"/>
    </style:style>
    <style:style style:name="T7" style:family="text">
      <style:text-properties officeooo:rsid="0016d865"/>
    </style:style>
    <style:style style:name="T8" style:family="text">
      <style:text-properties officeooo:rsid="001f267b"/>
    </style:style>
    <style:style style:name="T9" style:family="text">
      <style:text-properties officeooo:rsid="001d6256"/>
    </style:style>
    <style:style style:name="T10" style:family="text">
      <style:text-properties officeooo:rsid="0022279f"/>
    </style:style>
    <style:style style:name="T11" style:family="text">
      <style:text-properties officeooo:rsid="001bc5c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am’s rib as a picture of Jesus and <text:span text:style-name="T1">His wife</text:span></text:p>
      <text:p text:style-name="Table_20_Contents"/>
      <text:p text:style-name="Table_20_Contents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2">Genesis 2:21-22</text:span><text:line-break/><text:span text:style-name="T3">21</text:span> And the LORD God caused a deep sleep to fall upon Adam, and he slept: and <text:span text:style-name="T4">he took one of his ribs</text:span>, and closed up the flesh instead thereof;</text:p>
            <text:p text:style-name="P2"><text:span text:style-name="T3">22</text:span> And the rib, which the LORD God had taken from man, made he a woman, and brought her unto the man.</text:p>
          </table:table-cell>
        </table:table-row>
      </table:table>
      <text:list text:style-name="L1">
        <text:list-item>
          <text:p text:style-name="P3">Adam’s wife was create<text:span text:style-name="T5">d</text:span> from what was taken from his side.</text:p>
        </text:list-item>
      </text:list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2">John 19:34</text:span><text:line-break/>But one of the soldiers with a spear <text:span text:style-name="T6">pierced his side</text:span>, and forthwith <text:span text:style-name="T4">came there out blood</text:span> and water.</text:p>
          </table:table-cell>
        </table:table-row>
      </table:table>
      <text:list text:style-name="L2">
        <text:list-item>
          <text:p text:style-name="P5">The blood <text:span text:style-name="T7">which came from </text:span><text:span text:style-name="T8">Jesus’</text:span><text:span text:style-name="T7"> side was used to </text:span><text:span text:style-name="T9">birt</text:span><text:span text:style-name="T10">h</text:span><text:span text:style-name="T7"> the </text:span><text:span text:style-name="T1">wife of Christ which is the </text:span><text:span text:style-name="T11">s</text:span><text:span text:style-name="T1">aints.</text:span></text:p>
        </text:list-item>
        <text:list-item>
          <text:p text:style-name="P6">Jesus’ wife was created from what was taken from His sid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8T09:53:36.045296500</meta:creation-date>
    <dc:title>default</dc:title>
    <meta:editing-duration>PT54M5S</meta:editing-duration>
    <meta:editing-cycles>18</meta:editing-cycles>
    <meta:generator>LibreOffice/26.2.4.2$Linux_X86_64 LibreOffice_project/64a984c51f4702dbd3710b13428c673a2f1292e7</meta:generator>
    <meta:initial-creator>William K. McDannell Jr.</meta:initial-creator>
    <dc:date>2026-07-11T12:20:01.841144281</dc:date>
    <meta:document-statistic meta:table-count="2" meta:image-count="0" meta:object-count="0" meta:page-count="1" meta:paragraph-count="7" meta:word-count="129" meta:character-count="629" meta:non-whitespace-character-count="510"/>
    <meta:template xlink:type="simple" xlink:actuate="onRequest" xlink:title="default" xlink:href="../../../../AppData/Roaming/LibreOffice/4/user/template/default.ott" meta:date="2025-10-18T09:53:34.825853400"/>
  </office:meta>
</office:document-meta>
</file>