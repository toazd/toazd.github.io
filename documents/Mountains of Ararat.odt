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3000002B956C5AA4A.png" manifest:media-type="image/png"/>
  <manifest:file-entry manifest:full-path="Pictures/100000010000076F000003C7D6E563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7in" table:align="margins"/>
    </style:style>
    <style:style style:name="Table1.A" style:family="table-column">
      <style:table-column-properties style:column-width="10.7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Gabriela" fo:font-size="14pt" officeooo:rsid="00344644" officeooo:paragraph-rsid="00344644" style:font-size-asian="14pt" style:font-size-complex="14pt"/>
    </style:style>
    <style:style style:name="P2" style:family="paragraph" style:parent-style-name="Standard">
      <style:text-properties style:font-name="Gabriela Nerd Font"/>
    </style:style>
    <style:style style:name="P3" style:family="paragraph" style:parent-style-name="Standard">
      <style:paragraph-properties fo:text-align="left" style:justify-single-word="false"/>
      <style:text-properties style:font-name="Liberation Sans" fo:font-size="12pt" officeooo:paragraph-rsid="003152bb" style:font-size-asian="12pt" style:font-size-complex="12pt"/>
    </style:style>
    <style:style style:name="P4" style:family="paragraph" style:parent-style-name="Standard">
      <style:text-properties officeooo:paragraph-rsid="0038fc0b"/>
    </style:style>
    <style:style style:name="P5" style:family="paragraph" style:parent-style-name="Standard">
      <style:paragraph-properties fo:text-align="left" style:justify-single-word="false"/>
      <style:text-properties officeooo:paragraph-rsid="003152bb"/>
    </style:style>
    <style:style style:name="P6" style:family="paragraph" style:parent-style-name="Text_20_body">
      <style:paragraph-properties fo:text-align="left" style:justify-single-word="false"/>
      <style:text-properties style:font-name="Liberation Sans" fo:font-size="12pt" officeooo:rsid="0026fd16" officeooo:paragraph-rsid="002331ad" style:font-size-asian="12pt" style:font-size-complex="12pt"/>
    </style:style>
    <style:style style:name="P7" style:family="paragraph" style:parent-style-name="Text_20_body">
      <style:paragraph-properties fo:text-align="left" style:justify-single-word="false"/>
      <style:text-properties officeooo:rsid="002d673e" officeooo:paragraph-rsid="002331ad"/>
    </style:style>
    <style:style style:name="P8" style:family="paragraph" style:parent-style-name="Standard">
      <style:paragraph-properties fo:text-align="left" style:justify-single-word="false"/>
      <style:text-properties officeooo:rsid="0026fd16" officeooo:paragraph-rsid="00346363"/>
    </style:style>
    <style:style style:name="P9" style:family="paragraph" style:parent-style-name="Standard">
      <style:paragraph-properties fo:text-align="left" style:justify-single-word="false"/>
      <style:text-properties officeooo:rsid="002d673e" officeooo:paragraph-rsid="0034cad2"/>
    </style:style>
    <style:style style:name="T1" style:family="text">
      <style:text-properties officeooo:rsid="00366764"/>
    </style:style>
    <style:style style:name="T2" style:family="text">
      <style:text-properties fo:color="#127622" loext:opacity="100%"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color="#127622" loext:opacity="100%" fo:font-size="12pt" style:text-underline-style="none" fo:font-weight="bold" officeooo:rsid="0032e75e" style:font-size-asian="12pt" style:font-weight-asian="bold" style:font-size-complex="12pt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fo:background-color="#bdffbd" loext:char-shading-value="0"/>
    </style:style>
    <style:style style:name="T6" style:family="text">
      <style:text-properties fo:color="#127622" loext:opacity="100%" style:font-name="Gabriela Nerd Font" fo:font-size="12pt" style:text-underline-style="none" fo:font-weight="bold" officeooo:rsid="0032e75e" style:font-size-asian="12pt" style:font-weight-asian="bold" style:font-size-complex="12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fo:background-color="#ffff00" loext:char-shading-value="0" style:font-size-asian="12pt" style:font-size-complex="12pt"/>
    </style:style>
    <style:style style:name="T10" style:family="text">
      <style:text-properties style:font-name="Liberation Sans" fo:font-size="12pt" fo:font-weight="bold" fo:background-color="#bdffbd" loext:char-shading-value="0" style:font-size-asian="12pt" style:font-size-complex="12pt"/>
    </style:style>
    <style:style style:name="T11" style:family="text">
      <style:text-properties fo:font-size="10pt" officeooo:rsid="0038fc0b" style:font-size-asian="10pt" style:font-size-complex="10pt"/>
    </style:style>
    <style:style style:name="T12" style:family="text">
      <style:text-properties officeooo:rsid="002da2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unt<text:span text:style-name="T1">ains of</text:span> Arara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bookmark text:name="Gen"/><text:span text:style-name="T2">Gen</text:span><text:span text:style-name="T3">esis</text:span><text:span text:style-name="T2"> 8:4</text:span></text:p>
            <text:p text:style-name="P3">And the ark rested in the seventh month, on the seventeenth day of the month, upon the <text:span text:style-name="T4">mountains of Ararat</text:span>[<text:span text:style-name="T5">H780</text:span>].</text:p>
          </table:table-cell>
        </table:table-row>
        <table:table-row>
          <table:table-cell table:style-name="Table1.A2" office:value-type="string">
            <text:p text:style-name="P4"><text:bookmark text:name="2Ki"/><text:span text:style-name="T6">2 Kings 19:37</text:span><text:span text:style-name="T7"> (after Sennacherib king of Assyria returned to Nineveh during the reign of king Hezekiah)</text:span></text:p>
            <text:p text:style-name="P5"><text:span text:style-name="T8">And it came to pass, as he was worshipping in the house of Nisroch his god, that Adrammelech and Sharezer his sons smote him with the sword: and they escaped into the </text:span><text:span text:style-name="T9">land of Armenia</text:span><text:span text:style-name="T8">[</text:span><text:span text:style-name="T10">H780</text:span><text:span text:style-name="T8">]. And Esarhaddon his son reigned in his stead.</text:span></text:p>
          </table:table-cell>
        </table:table-row>
        <table:table-row>
          <table:table-cell table:style-name="Table1.A2" office:value-type="string">
            <text:p text:style-name="Standard"><text:bookmark text:name="Isa"/><text:span text:style-name="T6">Isaiah 37:38</text:span><text:span text:style-name="T7"> (after Sennacherib king of Assyria returned to Nineveh </text:span><text:span text:style-name="T11">during the reign of king Hezekiah</text:span><text:span text:style-name="T7">)</text:span></text:p>
            <text:p text:style-name="P5"><text:span text:style-name="T8">And it came to pass, as he was worshipping in the house of Nisroch his god, that Adrammelech and Sharezer his sons smote him with the sword; and they escaped into the </text:span><text:span text:style-name="T9">land of Armenia</text:span><text:span text:style-name="T8">[</text:span><text:span text:style-name="T10">H780</text:span><text:span text:style-name="T8">]: and Esar-haddon his son reigned in his stead.</text:span></text:p>
          </table:table-cell>
        </table:table-row>
        <table:table-row>
          <table:table-cell table:style-name="Table1.A2" office:value-type="string">
            <text:p text:style-name="Standard"><text:bookmark text:name="Jer"/><text:span text:style-name="T6">Jeremiah 51:27</text:span><text:span text:style-name="T7"> (prophecy against Babylon)</text:span></text:p>
            <text:p text:style-name="P3">Set ye up a standard in the land, blow the trumpet among the nations, prepare the nations against her, call together against her the kingdoms of <text:span text:style-name="T4">Ararat</text:span>[<text:span text:style-name="T5">H780</text:span>], Minni, and Ashchenaz; appoint a captain against her; cause the horses to come up as the rough caterpillers. <draw:frame draw:style-name="fr1" draw:name="Image2" text:anchor-type="char" svg:x="0in" svg:y="0.4846in" svg:width="10.6236in" svg:height="5.3972in" draw:z-index="1"><draw:image xlink:href="Pictures/100000010000076F000003C7D6E56390.png" xlink:type="simple" xlink:show="embed" xlink:actuate="onLoad" draw:mime-type="image/png"/></draw:frame></text:p>
          </table:table-cell>
        </table:table-row>
      </table:table>
      <text:p text:style-name="P6"><draw:frame draw:style-name="fr1" draw:name="Image1" text:anchor-type="char" svg:x="0in" svg:y="0.0909in" svg:width="10.7in" svg:height="6.7366in" draw:z-index="0"><draw:image xlink:href="Pictures/1000000100000453000002B956C5AA4A.png" xlink:type="simple" xlink:show="embed" xlink:actuate="onLoad" draw:mime-type="image/png"/></draw:frame><text:soft-page-break/></text:p>
      <text:p text:style-name="P7"/>
      <text:p text:style-name="P8">Software used to create maps:</text:p>
      <text:p text:style-name="P8"><text:a xlink:type="simple" xlink:href="https://biblemapper.com/" text:style-name="Internet_20_link" text:visited-style-name="Visited_20_Internet_20_Link">Biblemapper 3.0</text:a></text:p>
      <text:p text:style-name="P9">NOTE: the map colors are <text:span text:style-name="T12">based on topograph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1:19:10.414000000</meta:creation-date>
    <meta:editing-duration>PT38M35S</meta:editing-duration>
    <meta:editing-cycles>32</meta:editing-cycles>
    <meta:generator>LibreOffice/26.2.4.2$Linux_X86_64 LibreOffice_project/64a984c51f4702dbd3710b13428c673a2f1292e7</meta:generator>
    <dc:title>BibleStudyTemplate</dc:title>
    <dc:date>2026-07-11T12:30:56.095330785</dc:date>
    <meta:document-statistic meta:table-count="1" meta:image-count="2" meta:object-count="0" meta:page-count="2" meta:paragraph-count="12" meta:word-count="209" meta:character-count="1213" meta:non-whitespace-character-count="1015"/>
    <meta:template xlink:type="simple" xlink:actuate="onRequest" xlink:title="BibleStudyTemplate" xlink:href="../../../../AppData/Roaming/LibreOffice/4/user/template/BibleStudyTemplate.ott" meta:date="2025-04-09T11:19:09.545000000"/>
  </office:meta>
</office:document-meta>
</file>