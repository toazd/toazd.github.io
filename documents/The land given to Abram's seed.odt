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6.2271in" style:rel-column-width="49767*"/>
    </style:style>
    <style:style style:name="Table1.B" style:family="table-column">
      <style:table-column-properties style:column-width="1.9729in" style:rel-column-width="15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1a619b"/>
    </style:style>
    <style:style style:name="P2" style:family="paragraph" style:parent-style-name="Table_20_Contents">
      <style:text-properties fo:color="#127622" loext:opacity="100%" style:font-name="Gabriela Nerd Font" officeooo:rsid="00229fa8" officeooo:paragraph-rsid="001a619b"/>
    </style:style>
    <style:style style:name="P3" style:family="paragraph" style:parent-style-name="Standard">
      <style:text-properties officeooo:paragraph-rsid="001a619b"/>
    </style:style>
    <style:style style:name="T1" style:family="text">
      <style:text-properties fo:color="#127622" loext:opacity="100%" style:font-name="Gabriela Nerd Font" officeooo:rsid="00229fa8"/>
    </style:style>
    <style:style style:name="T2" style:family="text">
      <style:text-properties fo:color="#127622" loext:opacity="100%" style:font-name="Gabriela Nerd Font" officeooo:rsid="0214872d"/>
    </style:style>
    <style:style style:name="T3" style:family="text">
      <style:text-properties style:text-position="33% 80%"/>
    </style:style>
    <style:style style:name="T4" style:family="text">
      <style:text-properties fo:background-color="#fff5ce" loext:char-shading-value="0"/>
    </style:style>
    <style:style style:name="T5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Genesis 15:18-</text:span><text:span text:style-name="T2">21</text:span><text:line-break/><text:span text:style-name="T3">18</text:span> In the same day the LORD made a covenant with Abram, saying, Unto thy seed have I given this land, from the river of Egypt unto the great river, the river Euphrates: <text:line-break/><text:span text:style-name="T3">19</text:span> The <text:span text:style-name="T4">Kenites</text:span>, and the <text:span text:style-name="T5">Kenizzites</text:span>, and the <text:span text:style-name="T5">Kadmonites</text:span>, <text:line-break/><text:span text:style-name="T3">20</text:span> And the <text:span text:style-name="T5">Hittites</text:span>, and the <text:span text:style-name="T5">Perizzites</text:span>, and the <text:span text:style-name="T5">Rephaims</text:span>, <text:line-break/><text:span text:style-name="T3">21</text:span> And the <text:span text:style-name="T5">Amorites</text:span>, and the <text:span text:style-name="T5">Canaanites</text:span>, and the <text:span text:style-name="T5">Girgashites</text:span>, and the <text:span text:style-name="T5">Jebusites</text:span>.</text:p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Exodus 3:8</text:p>
            <text:p text:style-name="P1">And I am come down to deliver them out of the hand of the Egyptians, and to bring them up out of that land unto a good land and a large, unto a land flowing with milk and honey; unto the place of the <text:span text:style-name="T5">Canaanites</text:span>, and the <text:span text:style-name="T5">Hittites</text:span>, and the <text:span text:style-name="T5">Amorites</text:span>, and the <text:span text:style-name="T5">Perizzites</text:span>, and the <text:span text:style-name="T5">Hivites</text:span>, and the <text:span text:style-name="T5">Jebusites</text:span>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odus 3:17</text:p>
            <text:p text:style-name="P1">And I have said, I will bring you up out of the affliction of Egypt unto the land of the <text:span text:style-name="T5">Canaanites</text:span>, and the <text:span text:style-name="T5">Hittites</text:span>, and the <text:span text:style-name="T5">Amorites</text:span>, and the <text:span text:style-name="T5">Perizzites</text:span>, and the <text:span text:style-name="T5">Hivites</text:span>, and the <text:span text:style-name="T5">Jebusites</text:span>, unto a land flowing with milk and honey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odus 13:5</text:p>
            <text:p text:style-name="P1">And it shall be when the LORD shall bring thee into the land of the <text:span text:style-name="T5">Canaanites</text:span>, and the <text:span text:style-name="T5">Hittites</text:span>, and the <text:span text:style-name="T5">Amorites</text:span>, and the <text:span text:style-name="T5">Hivites</text:span>, and the <text:span text:style-name="T5">Jebusites</text:span>, which he sware unto thy fathers to give thee, a land flowing with milk and honey, that thou shalt keep this service in this month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odus 23:23</text:p>
            <text:p text:style-name="P1">For mine Angel shall go before thee, and bring thee in unto the <text:span text:style-name="T5">Amorites</text:span>, and the <text:span text:style-name="T5">Hittites</text:span>, and the <text:span text:style-name="T5">Perizzites</text:span>, and the <text:span text:style-name="T5">Canaanites</text:span>, and the <text:span text:style-name="T5">Hivites</text:span>, and the <text:span text:style-name="T5">Jebusites</text:span>: and I will cut them off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odus 33:2</text:p>
            <text:p text:style-name="P1">And I will send an angel before thee; and I will drive out the <text:span text:style-name="T5">Canaanite</text:span>, the <text:span text:style-name="T5">Amorite</text:span>, and the <text:span text:style-name="T5">Hittite</text:span>, and the <text:span text:style-name="T5">Perizzite</text:span>, the <text:span text:style-name="T5">Hivite</text:span>, and the <text:span text:style-name="T5">Jebusite</text:span>: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odus 34:11</text:p>
            <text:p text:style-name="P1">Observe thou that which I command thee this day: behold, I drive out before thee the <text:span text:style-name="T5">Amorite</text:span>, and the <text:span text:style-name="T5">Canaanite</text:span>, and the <text:span text:style-name="T5">Hittite</text:span>, and the <text:span text:style-name="T5">Perizzite</text:span>, and the <text:span text:style-name="T5">Hivite</text:span>, and the <text:span text:style-name="T5">Jebusite</text:span>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umbers 13:29</text:p>
            <text:p text:style-name="P1">The <text:span text:style-name="T5">Amalekites</text:span> dwell in the land of the south: and the <text:span text:style-name="T5">Hittites</text:span>, and the <text:span text:style-name="T5">Jebusites</text:span>, and the <text:span text:style-name="T5">Amorites</text:span>, dwell in the mountains: and the <text:span text:style-name="T5">Canaanites</text:span> dwell by the sea, and by the coast of Jordan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euteronomy 7:1</text:p>
            <text:p text:style-name="P1">When the LORD thy God shall bring thee into the land whither thou goest to possess it, and hath cast out many nations before thee, the <text:span text:style-name="T5">Hittites</text:span>, and the <text:span text:style-name="T5">Girgashites</text:span>, and the <text:span text:style-name="T5">Amorites</text:span>, and the <text:span text:style-name="T5">Canaanites</text:span>, and the <text:span text:style-name="T5">Perizzites</text:span>, and the <text:span text:style-name="T5">Hivites</text:span>, and the <text:span text:style-name="T5">Jebusites</text:span>, seven nations greater and mightier than thou;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euteronomy 20:17</text:p>
            <text:p text:style-name="P1">But thou shalt utterly destroy them; namely, the <text:span text:style-name="T5">Hittites</text:span>, and the <text:span text:style-name="T5">Amorites</text:span>, the <text:span text:style-name="T5">Canaanites</text:span>, and the <text:span text:style-name="T5">Perizzites</text:span>, the <text:span text:style-name="T5">Hivites</text:span>, and the <text:span text:style-name="T5">Jebusites</text:span>; as the LORD thy God hath commanded thee: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Joshua 3:10</text:p>
            <text:p text:style-name="P1">And Joshua said, Hereby ye shall know that the living God is among you, and that he will without fail drive out from before you the <text:span text:style-name="T5">Canaanites</text:span>, and the <text:span text:style-name="T5">Hittites</text:span>, and the <text:span text:style-name="T5">Hivites</text:span>, and the <text:span text:style-name="T5">Perizzites</text:span>, and the <text:span text:style-name="T5">Girgashites</text:span>, and the <text:span text:style-name="T5">Amorites</text:span>, and the <text:soft-page-break/><text:span text:style-name="T5">Jebusites</text:span>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Joshua 24:11</text:p>
            <text:p text:style-name="P1">And ye went over Jordan, and came unto Jericho: and the men of Jericho fought against you, the <text:span text:style-name="T5">Amorites</text:span>, and the <text:span text:style-name="T5">Perizzites</text:span>, and the <text:span text:style-name="T5">Canaanites</text:span>, and the <text:span text:style-name="T5">Hittites</text:span>, and the <text:span text:style-name="T5">Girgashites</text:span>, the <text:span text:style-name="T5">Hivites</text:span>, and the <text:span text:style-name="T5">Jebusites</text:span>; and I delivered them into your hand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Deuteronomy 7:1-4</text:span><text:line-break/><text:span text:style-name="T3">1</text:span> When the LORD thy God shall bring thee into the land whither thou goest to possess it, and hath cast out many nations before thee, the <text:span text:style-name="T5">Hittites</text:span>, and the <text:span text:style-name="T5">Girgashites</text:span>, and the <text:span text:style-name="T5">Amorites</text:span>, and the <text:span text:style-name="T5">Canaanites</text:span>, and the <text:span text:style-name="T5">Perizzites</text:span>, and the <text:span text:style-name="T5">Hivites</text:span>, and the <text:span text:style-name="T5">Jebusites</text:span>, seven nations greater and mightier than thou; <text:line-break/><text:span text:style-name="T3">2</text:span> And when the LORD thy God shall deliver them before thee; thou shalt smite them, and utterly destroy them; thou shalt make no covenant with them, nor shew mercy unto them: <text:line-break/><text:span text:style-name="T3">3</text:span> <text:span text:style-name="T5">Neither shalt thou make marriages with them</text:span>; thy daughter thou shalt not give unto his son, nor his daughter shalt thou take unto thy son. <text:line-break/><text:span text:style-name="T3">4</text:span> For they will turn away thy son from following me, that they may serve other gods: so will the anger of the LORD be kindled against you, and destroy thee suddenly.</text:p>
          </table:table-cell>
          <table:table-cell table:style-name="Table1.B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5T11:23:43.767267200</meta:creation-date>
    <meta:editing-duration>PT11S</meta:editing-duration>
    <meta:editing-cycles>3</meta:editing-cycles>
    <meta:generator>LibreOffice/26.2.4.2$Linux_X86_64 LibreOffice_project/64a984c51f4702dbd3710b13428c673a2f1292e7</meta:generator>
    <dc:title>BibleStudyTemplate</dc:title>
    <dc:date>2026-07-11T12:19:55.484615094</dc:date>
    <meta:document-statistic meta:table-count="1" meta:image-count="0" meta:object-count="0" meta:page-count="2" meta:paragraph-count="24" meta:word-count="691" meta:character-count="3860" meta:non-whitespace-character-count="3187"/>
    <meta:template xlink:type="simple" xlink:actuate="onRequest" xlink:title="BibleStudyTemplate" xlink:href="../../../../AppData/Roaming/LibreOffice/4/user/template/BibleStudyTemplate.ott" meta:date="2025-06-05T11:23:43.398131000"/>
  </office:meta>
</office:document-meta>
</file>