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Table1" style:family="table">
      <style:table-properties style:width="7.9in" style:rel-width="100%" fo:margin-left="0in" fo:margin-top="0in" fo:margin-bottom="0in" table:align="left" style:writing-mode="page"/>
    </style:style>
    <style:style style:name="Table1.A" style:family="table-column">
      <style:table-column-properties style:column-width="3.95in" style:rel-column-width="3276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writing-mode="lr-tb"/>
      <style:text-properties style:font-name="Liberation Sans1" fo:font-size="12pt" style:text-underline-style="none" fo:font-weight="bold" style:font-size-asian="12pt" style:font-weight-asian="bold" style:font-size-complex="12pt" style:font-weight-complex="bold"/>
    </style:style>
    <style:style style:name="P2" style:family="paragraph" style:parent-style-name="Standard">
      <style:paragraph-properties fo:text-align="center" style:justify-single-word="false" style:writing-mode="lr-tb"/>
      <style:text-properties style:font-name="Liberation Sans1" fo:font-size="12pt" style:font-size-asian="12pt" style:font-size-complex="12pt"/>
    </style:style>
    <style:style style:name="P3" style:family="paragraph" style:parent-style-name="Standard">
      <style:paragraph-properties fo:text-align="center"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left" style:justify-single-word="false" style:writing-mode="lr-tb"/>
      <style:text-properties style:font-name="Liberation Sans1"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list-style-name="WWNum1">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6" style:family="paragraph" style:parent-style-name="Standard" style:list-style-name="WWNum1">
      <style:paragraph-properties fo:text-align="left" style:justify-single-word="false" style:writing-mode="lr-tb"/>
    </style:style>
    <style:style style:name="P7" style:family="paragraph" style:parent-style-name="Standard" style:list-style-name="WWNum1">
      <style:paragraph-properties fo:text-align="left" style:justify-single-word="false" style:writing-mode="lr-tb"/>
      <style:text-properties style:font-name="Liberation Sans1" fo:font-size="12pt" style:font-size-asian="12pt" style:font-size-complex="12pt"/>
    </style:style>
    <style:style style:name="P8" style:family="paragraph" style:parent-style-name="Standard" style:list-style-name="WWNum2">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10" style:family="paragraph" style:parent-style-name="Standard" style:list-style-name="WWNum3">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11" style:family="paragraph" style:parent-style-name="Standard">
      <style:paragraph-properties fo:margin-top="0in" fo:margin-bottom="0in" style:contextual-spacing="false" fo:text-align="left" style:justify-single-word="false" fo:break-before="page" style:writing-mode="lr-tb"/>
      <style:text-properties style:font-name="Liberation Sans1"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list-style-name="WWNum4">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13" style:family="paragraph" style:parent-style-name="Standard" style:list-style-name="WWNum5">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14" style:family="paragraph" style:parent-style-name="Standard" style:list-style-name="WWNum6">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15" style:family="paragraph" style:parent-style-name="Standard" style:list-style-name="WWNum7">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16" style:family="paragraph" style:parent-style-name="Standard" style:list-style-name="WWNum7">
      <style:paragraph-properties fo:text-align="left" style:justify-single-word="false" style:writing-mode="lr-tb"/>
      <style:text-properties style:font-name="Liberation Sans1" fo:font-size="12pt" style:font-size-asian="12pt" style:font-size-complex="12pt"/>
    </style:style>
    <style:style style:name="P17" style:family="paragraph" style:parent-style-name="Standard">
      <style:paragraph-properties fo:text-align="left" style:justify-single-word="false" style:writing-mode="lr-tb"/>
      <style:text-properties style:font-name="Liberation Sans1" fo:font-size="12pt" style:text-underline-style="none" fo:font-weight="normal" officeooo:rsid="001c76f6" officeooo:paragraph-rsid="001f2588" style:font-size-asian="12pt" style:font-weight-asian="normal" style:font-size-complex="12pt" style:font-weight-complex="normal"/>
    </style:style>
    <style:style style:name="P18" style:family="paragraph" style:parent-style-name="Standard">
      <style:paragraph-properties fo:text-align="left" style:justify-single-word="false" style:writing-mode="lr-tb"/>
      <style:text-properties style:font-name="Liberation Sans1" fo:font-size="12pt" style:text-underline-style="none" fo:font-weight="normal" officeooo:rsid="001c7b0e" officeooo:paragraph-rsid="001f2588" style:font-size-asian="12pt" style:font-weight-asian="normal" style:font-size-complex="12pt" style:font-weight-complex="normal"/>
    </style:style>
    <style:style style:name="P19" style:family="paragraph" style:parent-style-name="Standard" style:list-style-name="L1">
      <style:paragraph-properties fo:text-align="left" style:justify-single-word="false" style:writing-mode="lr-tb"/>
      <style:text-properties style:font-name="Liberation Sans1" fo:font-size="12pt" style:text-underline-style="none" fo:font-weight="normal" officeooo:rsid="001c7b0e" officeooo:paragraph-rsid="001c7b0e" style:font-size-asian="12pt" style:font-weight-asian="normal" style:font-size-complex="12pt" style:font-weight-complex="normal"/>
    </style:style>
    <style:style style:name="P20" style:family="paragraph" style:parent-style-name="Standard" style:list-style-name="L1">
      <style:paragraph-properties fo:text-align="left" style:justify-single-word="false" style:writing-mode="lr-tb"/>
      <style:text-properties style:font-name="Liberation Sans1" fo:font-size="12pt" style:text-underline-style="none" fo:font-weight="normal" officeooo:rsid="001c7b0e" officeooo:paragraph-rsid="0024e932" style:font-size-asian="12pt" style:font-weight-asian="normal" style:font-size-complex="12pt" style:font-weight-complex="normal"/>
    </style:style>
    <style:style style:name="P21" style:family="paragraph" style:parent-style-name="Standard" style:list-style-name="L1">
      <style:paragraph-properties fo:text-align="left" style:justify-single-word="false" style:writing-mode="lr-tb"/>
      <style:text-properties style:font-name="Liberation Sans1" fo:font-size="12pt" style:text-underline-style="none" fo:font-weight="normal" officeooo:rsid="001e5f1b" officeooo:paragraph-rsid="001e5f1b" style:font-size-asian="12pt" style:font-weight-asian="normal" style:font-size-complex="12pt" style:font-weight-complex="normal"/>
    </style:style>
    <style:style style:name="P22" style:family="paragraph" style:parent-style-name="Standard">
      <style:paragraph-properties fo:text-align="left" style:justify-single-word="false" style:writing-mode="lr-tb"/>
      <style:text-properties style:font-name="Liberation Sans1" fo:font-size="12pt" style:font-size-asian="12pt" style:font-size-complex="12pt"/>
    </style:style>
    <style:style style:name="P23" style:family="paragraph" style:parent-style-name="Table_20_Contents">
      <style:paragraph-properties fo:text-align="center" style:justify-single-word="false"/>
      <style:text-properties style:font-name="Liberation Sans1" fo:font-size="12pt" style:font-size-asian="12pt" style:font-size-complex="12pt"/>
    </style:style>
    <style:style style:name="T1" style:family="text">
      <style:text-properties style:text-underline-style="none" fo:font-weight="normal" style:font-weight-asian="normal" style:font-weight-complex="normal"/>
    </style:style>
    <style:style style:name="T2" style:family="text">
      <style:text-properties style:font-name="Liberation Sans1" fo:font-size="12pt" style:text-underline-style="none" fo:font-weight="normal" style:font-size-asian="12pt" style:font-weight-asian="normal" style:font-size-complex="12pt" style:font-weight-complex="normal"/>
    </style:style>
    <style:style style:name="T3" style:family="text">
      <style:text-properties style:font-name="Liberation Sans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officeooo:rsid="001f2588"/>
    </style:style>
    <style:style style:name="T8" style:family="text">
      <style:text-properties officeooo:rsid="0020c7c6"/>
    </style:style>
    <style:style style:name="T9" style:family="text">
      <style:text-properties officeooo:rsid="0020ab18"/>
    </style:style>
    <style:style style:name="T10" style:family="text">
      <style:text-properties officeooo:rsid="001cb583"/>
    </style:style>
    <style:style style:name="T11" style:family="text">
      <style:text-properties officeooo:rsid="0022830d"/>
    </style:style>
    <style:style style:name="T12" style:family="text">
      <style:text-properties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can we learn about Melchizedek/Melchisedec from scripture?</text:p>
      <text:p text:style-name="P2"><text:span text:style-name="T1"/></text:p>
      <text:p text:style-name="P3"/>
      <text:p text:style-name="P3"/>
      <text:p text:style-name="P4">Genesis 14:18-20</text:p>
      <text:p text:style-name="P4"/>
      <text:list text:style-name="WWNum1">
        <text:list-item>
          <text:p text:style-name="P5">He is the “king of Salem”</text:p>
          <text:list>
            <text:list-item>
              <text:p text:style-name="P5">“Salem” is also called “Zion” (Psalm 76:1-2).</text:p>
            </text:list-item>
            <text:list-item>
              <text:p text:style-name="P5">King David takes “Jerusalem” from the Jebusites and the fort there is called both “the strong hold of Zion” and becomes “the city of David” (2 Samuel 5:6-7).</text:p>
            </text:list-item>
            <text:list-item>
              <text:p text:style-name="P6"><text:span text:style-name="T2">“King of Salem” also means “King of Peace”</text:span><text:span text:style-name="Emphasis"><text:span text:style-name="T3"> (Hebrews 7:2c-2e)</text:span></text:span></text:p>
            </text:list-item>
          </text:list>
        </text:list-item>
        <text:list-item>
          <text:p text:style-name="P7"><text:span text:style-name="T1">He brought </text:span><text:span text:style-name="T4">bread</text:span><text:span text:style-name="T1"> and </text:span><text:span text:style-name="T4">wine</text:span><text:span text:style-name="T1"> as a gift to Abram</text:span><text:span text:style-name="T5">.</text:span></text:p>
        </text:list-item>
        <text:list-item>
          <text:p text:style-name="P7"><text:span text:style-name="T1">He was </text:span><text:span text:style-name="T4">the</text:span><text:span text:style-name="T1"> priest of the most high God.</text:span></text:p>
        </text:list-item>
        <text:list-item>
          <text:p text:style-name="P5">He blessed Abram (Hebrews 7:5-7 - “...the less is blessed of the better…”)</text:p>
          <text:list>
            <text:list-item>
              <text:p text:style-name="P5">This places the order of Melchisedec above Abram and his descendants (Levites).</text:p>
            </text:list-item>
          </text:list>
        </text:list-item>
        <text:list-item>
          <text:p text:style-name="P5">He blessed the most high God.</text:p>
          <text:list>
            <text:list-item>
              <text:p text:style-name="P5">He was aware that it was God that gave Abram the victory.</text:p>
            </text:list-item>
          </text:list>
        </text:list-item>
        <text:list-item>
          <text:p text:style-name="P5">Abram gave tithes (one tenth – Leviticus 27:32, Hebrews 7:2) of all the goods to Melchizedek.</text:p>
          <text:list>
            <text:list-item>
              <text:p text:style-name="P5">There are 32 occurrences of the words tithe/tithes in the Bible.</text:p>
              <text:list>
                <text:list-item>
                  <text:p text:style-name="P5">Genesis 14:20 is the first one and it’s from Abram to Melchizedek.</text:p>
                  <text:list>
                    <text:list-item>
                      <text:p text:style-name="P5">Hebrews 7:6, 9d reference this event</text:p>
                    </text:list-item>
                  </text:list>
                </text:list-item>
                <text:list-item>
                  <text:p text:style-name="P5">Every other biblical references to tithe/tithes refers to tithes belonging to God (some of which the Levites inherit because the LORD is their inheritance – Deuteronomy 18:1-2).</text:p>
                </text:list-item>
              </text:list>
            </text:list-item>
          </text:list>
        </text:list-item>
      </text:list>
      <text:p text:style-name="P4"/>
      <text:p text:style-name="P4"/>
      <text:p text:style-name="P4"/>
      <text:p text:style-name="P4">Psalm 110 (A Psalm of David.)</text:p>
      <text:p text:style-name="P4"/>
      <text:list text:style-name="WWNum2">
        <text:list-item>
          <text:p text:style-name="P8">David, in spirit (Matthew 22:42-45), prophesies (Acts 2:29-35) of the coming Messiah.</text:p>
          <text:list>
            <text:list-item>
              <text:list>
                <text:list-item>
                  <text:p text:style-name="P8">Jesus identifies himself as that “Lord” in Psalm 110:1 in Matthew 22:42-45.</text:p>
                </text:list-item>
              </text:list>
            </text:list-item>
          </text:list>
        </text:list-item>
        <text:list-item>
          <text:p text:style-name="P8">The coming Messiah is prophesied by the prophet David to be a priest for ever after the order of Melchizedek.</text:p>
        </text:list-item>
        <text:list-item>
          <text:p text:style-name="P8">Verse 1</text:p>
          <text:list>
            <text:list-item>
              <text:p text:style-name="P8">LORD – Yᵊhōvâ</text:p>
            </text:list-item>
            <text:list-item>
              <text:p text:style-name="P8">Lord – 'āḏôn</text:p>
            </text:list-item>
          </text:list>
        </text:list-item>
        <text:list-item>
          <text:p text:style-name="P8">Verse 2</text:p>
          <text:list>
            <text:list-item>
              <text:p text:style-name="P8">LORD – Yᵊhōvâ</text:p>
            </text:list-item>
          </text:list>
        </text:list-item>
        <text:list-item>
          <text:p text:style-name="P8">Verse 4</text:p>
          <text:list>
            <text:list-item>
              <text:p text:style-name="P8">LORD – Yᵊhōvâ</text:p>
            </text:list-item>
          </text:list>
        </text:list-item>
        <text:list-item>
          <text:p text:style-name="P8">Verse 5</text:p>
          <text:list>
            <text:list-item>
              <text:p text:style-name="P8">Lord – 'ăḏōnāy (plural of āḏôn)</text:p>
            </text:list-item>
          </text:list>
        </text:list-item>
      </text:list>
      <text:p text:style-name="P9"/>
      <text:p text:style-name="P9"/>
      <text:p text:style-name="P9"/>
      <text:p text:style-name="P4">Hebrews 5:1-10, 6:20</text:p>
      <text:p text:style-name="P4"/>
      <text:list text:style-name="WWNum3">
        <text:list-item>
          <text:p text:style-name="P10">Confirms the prophesy from Psalm 110.</text:p>
        </text:list-item>
      </text:list>
      <text:p text:style-name="P9"/>
      <text:p text:style-name="P4"/>
      <text:p text:style-name="P11">Hebrews 7:1-3</text:p>
      <text:p text:style-name="P4"/>
      <text:list text:style-name="WWNum4">
        <text:list-item>
          <text:p text:style-name="P12">His name means “King of righteousness” and “King of peace”.</text:p>
          <text:list>
            <text:list-item>
              <text:p text:style-name="P12">Both his name and title are likely epithets (refer to the extra notes section below).</text:p>
            </text:list-item>
          </text:list>
        </text:list-item>
        <text:list-item>
          <text:p text:style-name="P12">He has no father, no mother, and no descent (no family leading down to him).</text:p>
        </text:list-item>
        <text:list-item>
          <text:p text:style-name="P12">He has no beginning.</text:p>
        </text:list-item>
        <text:list-item>
          <text:p text:style-name="P12">There is no end to his life.</text:p>
        </text:list-item>
        <text:list-item>
          <text:p text:style-name="P12">He was “made like unto the Son of God”.</text:p>
        </text:list-item>
        <text:list-item>
          <text:p text:style-name="P12">He “abideth [as] a priest continually”.</text:p>
        </text:list-item>
      </text:list>
      <text:p text:style-name="P9"/>
      <text:p text:style-name="P4">Hebrews 7:4-22, 28</text:p>
      <text:p text:style-name="P4"/>
      <text:list text:style-name="WWNum5">
        <text:list-item>
          <text:p text:style-name="P13">Study the following verses very carefully. There is a lot to chew on, especially verses 8, 13-15, 18, 21, and 28. The following notes are just to get you started.</text:p>
          <text:list>
            <text:list-item>
              <text:p text:style-name="P13">Verse 6,7</text:p>
            </text:list-item>
          </text:list>
        </text:list-item>
      </text:list>
      <text:list text:style-name="WWNum6">
        <text:list-item>
          <text:list>
            <text:list-item>
              <text:list>
                <text:list-item>
                  <text:p text:style-name="P14">Melchisedec is not descended from Abraham and he is also “better” than Abraham (and his descendants).</text:p>
                </text:list-item>
              </text:list>
            </text:list-item>
          </text:list>
        </text:list-item>
      </text:list>
      <text:list text:style-name="WWNum7">
        <text:list-item>
          <text:list>
            <text:list-item>
              <text:p text:style-name="P15">Verse 8</text:p>
              <text:list>
                <text:list-item>
                  <text:p text:style-name="P15">“And here men that die receive tithes; but there [where Melchisedec is] he [Melchisedec] receiveth them [the men that die], of whom [the men that die] it is witnessed that he [Melchisedec] liveth.”</text:p>
                </text:list-item>
              </text:list>
            </text:list-item>
            <text:list-item>
              <text:p text:style-name="P15">Verse 13</text:p>
              <text:list>
                <text:list-item>
                  <text:p text:style-name="P15">Melchisedec is from a tribe that is not the Levites or any other that “gave attendance at the altar”.</text:p>
                </text:list-item>
              </text:list>
            </text:list-item>
            <text:list-item>
              <text:p text:style-name="P15">Verse 14</text:p>
              <text:list>
                <text:list-item>
                  <text:p text:style-name="P15">Jesus is both the root and offspring of David and descended from the tribe of Judah (Revelation 22:16, Matthew 1:2-3, Luke 3:33-34).</text:p>
                </text:list-item>
              </text:list>
            </text:list-item>
            <text:list-item>
              <text:p text:style-name="P15">Verse 15</text:p>
              <text:list>
                <text:list-item>
                  <text:p text:style-name="P15">“similitude” appears 11 times in the bible and a quick word study of biblical usage reveals that it is used as “likeness” or “image”.</text:p>
                </text:list-item>
                <text:list-item>
                  <text:p text:style-name="P16"><text:span text:style-name="T1">A word study of “order” (ie. order of Melchizedek) reveals that one of the biblical usages is “manner” or “rank” (2 Kings 23:4). It is also used to </text:span><text:span text:style-name="T6">express</text:span><text:span text:style-name="T1"> “one against another” (Exodus 26:17), and the “proper sequence of a thing or things” (Psalm 50:21, 23, 119:133).</text:span></text:p>
                </text:list-item>
                <text:list-item>
                  <text:p text:style-name="P15">Genesis 1:26 defines “image” as “likeness”.</text:p>
                </text:list-item>
                <text:list-item>
                  <text:p text:style-name="P15">Jesus Christ is the express image of God (Hebrews 1:1-3).</text:p>
                </text:list-item>
                <text:list-item>
                  <text:p text:style-name="P16"><text:span text:style-name="T1">“like unto” is used to </text:span><text:span text:style-name="T6">express</text:span><text:span text:style-name="T1"> “likeness” (Exodus 25:33).</text:span></text:p>
                </text:list-item>
                <text:list-item>
                  <text:p text:style-name="P15">Melchisedec was made “like unto the Son of God” (Hebrews 7:3).</text:p>
                </text:list-item>
              </text:list>
            </text:list-item>
          </text:list>
        </text:list-item>
      </text:list>
      <text:p text:style-name="P9"/>
      <text:p text:style-name="P9"/>
      <text:p text:style-name="P9"/>
      <text:p text:style-name="P17">If it wasn’t abundantly obvious by now, Melchizedek is God in the flesh!</text:p>
      <text:p text:style-name="P17"/>
      <text:p text:style-name="P17"/>
      <text:p text:style-name="P18">Other instances of God in flesh <text:span text:style-name="T7">in the old testament </text:span>are:</text:p>
      <text:list text:style-name="L1">
        <text:list-item>
          <text:p text:style-name="P19">The man that Moses spoke to face-to-face with <text:span text:style-name="T8">on a regular basis </text:span>(<text:span text:style-name="T9">Exo 33:20</text:span>).</text:p>
        </text:list-item>
        <text:list-item>
          <text:p text:style-name="P20">The <text:span text:style-name="T10">man</text:span> that Joshua worshipped before the battle at Jericho<text:span text:style-name="T10"> </text:span><text:span text:style-name="T11">and was not rebuked for doing so </text:span><text:span text:style-name="T10">(Jos 5:13-15)</text:span><text:span text:style-name="T11">.</text:span></text:p>
        </text:list-item>
        <text:list-item>
          <text:p text:style-name="P21">One of the men that visited Abraham before Sodom and Gomorrah were destroyed.</text:p>
        </text:list-item>
      </text:list>
      <text:p text:style-name="P11">Extra notes</text:p>
      <text:p text:style-name="P4"/>
      <text:p text:style-name="P22">Some sources claim that Melchizedek is Shem, Abrams father (Genesis 10:10-26) and the second son of Noah (Genesis 9:22-24, Genesis 10:21). There is no <text:span text:style-name="T12">biblical</text:span> evidence to support that idea that I am aware of.</text:p>
      <text:p text:style-name="P22"/>
      <text:p text:style-name="P22">Melchizedek is the “king of Salem” (likely an epithet) which, as we’ve learned, Salem is also an ancient name for Jerusalem. The Jebusites that inhabited Jerusalem and that region (before the conquest of King David) were pagan idolaters (Deuteronomy 7:1-5) and descendants of Ham (Genesis 10:6-16) so it makes no sense that a priest of the most high God of whom Christ was made in the likeness of was a king of such a place and people. God commanded Israel to “utterly destroy them” (Deuteronomy 20:17-18). The inhabitants of that region were descendants of Canaan (Ham), who were cursed by Noah (Genesis 9:25-27) who simultaneously prophesied that Canaan (and likely his descendants given what happens later in the land of Canaan) would be “a servant of servants” unto his brethren which is later fulfilled when Israel led by Joshua conquer the Hittites, Amorites, Canaanites, Perizzites, Hivites, and the Jebusites (Joshua 9:1-27, 17:12-13). Oshea the son of Nun (Exodus 33:11) was from the tribe of Ephraim (Numbers 13:8) which was descended from Shem (Genesis 11:10-27) and his name was changed by Moses to Jehoshua (Numbers 13:16) AKA Joshua (Numbers 14:6).</text:p>
      <text:p text:style-name="P22"/>
      <text:p text:style-name="P22">The LORD makes a covenant with Abram that his seed will inherit the land from the river of Egypt to the river Euphrates (Genesis 15:18-21). Following that covenant are commands given from the LORD to Moses which he speaks to all of Israel (Deuteronomy 5:1) to “utterly destroy” the people there, make no covenant with them, show them no mercy, and do not marry them (Deuteronomy 7:1-5).</text:p>
      <text:p text:style-name="P22"/>
      <text:p text:style-name="P22">It is not unreasonable to suggest that the “land of Canaan” could refer to “the land of the descendants of Canaan” (Jebusites, Amorites, and Canaanites). The following is not a comprehensive list of lands seemingly named after men in scripture:</text:p>
      <text:p text:style-name="P22"/>
      <table:table table:name="Table1" table:style-name="Table1">
        <table:table-column table:style-name="Table1.A" table:number-columns-repeated="2"/>
        <table:table-row table:style-name="Table1.1">
          <table:table-cell table:style-name="Table1.A1" office:value-type="string">
            <text:p text:style-name="P23">Man</text:p>
          </table:table-cell>
          <table:table-cell table:style-name="Table1.B1" office:value-type="string">
            <text:p text:style-name="P23">Land</text:p>
          </table:table-cell>
        </table:table-row>
        <table:table-row table:style-name="Table1.1">
          <table:table-cell table:style-name="Table1.A2" office:value-type="string">
            <text:p text:style-name="P22">Seir the Horite (Genesis 36:20) </text:p>
          </table:table-cell>
          <table:table-cell table:style-name="Table1.B2" office:value-type="string">
            <text:p text:style-name="P22">Land of Seir (Genesis 32:3, Genesis 36:30)</text:p>
          </table:table-cell>
        </table:table-row>
        <table:table-row table:style-name="Table1.1">
          <table:table-cell table:style-name="Table1.A2" office:value-type="string">
            <text:p text:style-name="P22">Esau/Edom (Genesis 36:21)</text:p>
          </table:table-cell>
          <table:table-cell table:style-name="Table1.B2" office:value-type="string">
            <text:p text:style-name="P22">Land of Edom (Genesis 36:8, 36:16, 36:17, ...)</text:p>
          </table:table-cell>
        </table:table-row>
        <table:table-row table:style-name="Table1.1">
          <table:table-cell table:style-name="Table1.A2" office:value-type="string">
            <text:p text:style-name="P22">Midian son of Abraham (Genesis 25:2)</text:p>
          </table:table-cell>
          <table:table-cell table:style-name="Table1.B2" office:value-type="string">
            <text:p text:style-name="P22">Land of Midian (Exodus 2:15)</text:p>
          </table:table-cell>
        </table:table-row>
        <table:table-row table:style-name="Table1.1">
          <table:table-cell table:style-name="Table1.A2" office:value-type="string">
            <text:p text:style-name="P22">Jazer (Numbers 32:3)</text:p>
          </table:table-cell>
          <table:table-cell table:style-name="Table1.B2" office:value-type="string">
            <text:p text:style-name="P22">Land of Jazer (Numbers 32:1)</text:p>
          </table:table-cell>
        </table:table-row>
        <table:table-row table:style-name="Table1.1">
          <table:table-cell table:style-name="Table1.A2" office:value-type="string">
            <text:p text:style-name="P22">Gilead son of Manasseh, son of Joseph, son of Israel (Numbers 26:29)</text:p>
          </table:table-cell>
          <table:table-cell table:style-name="Table1.B2" office:value-type="string">
            <text:p text:style-name="P22">Land of Gilead (Numbers 32:1)</text:p>
          </table:table-cell>
        </table:table-row>
        <table:table-row table:style-name="Table1.1">
          <table:table-cell table:style-name="Table1.A2" office:value-type="string">
            <text:p text:style-name="P22">Moab son of Lot (Genesis 19:37)</text:p>
          </table:table-cell>
          <table:table-cell table:style-name="Table1.B2" office:value-type="string">
            <text:p text:style-name="P22">Land of Moab (Deuteronomy 1:5)</text:p>
          </table:table-cell>
        </table:table-row>
        <table:table-row table:style-name="Table1.1">
          <table:table-cell table:style-name="Table1.A2" office:value-type="string">
            <text:p text:style-name="P22">Benammi son of Lot (Genesis 19:38)</text:p>
          </table:table-cell>
          <table:table-cell table:style-name="Table1.B2" office:value-type="string">
            <text:p text:style-name="P22">Land of the children of Ammon (Deuteronomy 2:19)</text:p>
          </table:table-cell>
        </table:table-row>
        <table:table-row table:style-name="Table1.1">
          <table:table-cell table:style-name="Table1.A2" office:value-type="string">
            <text:p text:style-name="P22">Uz son of Aram (Genesis 10:23)</text:p>
          </table:table-cell>
          <table:table-cell table:style-name="Table1.B2" office:value-type="string">
            <text:p text:style-name="P22">Land of Uz (Job 1:1, Jeremiah 25:20, Lamentations 4:21)</text:p>
          </table:table-cell>
        </table:table-row>
      </table:table>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style:use-window-font-color="true" loext:opacity="0%" style:font-name="Liberation Sans2" fo:font-family="'Liberation Sans'" style:font-style-name="Regular" style:font-family-generic="swiss"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15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12T12:24:08</meta:creation-date>
    <dc:language>en-US</dc:language>
    <dc:date>2026-07-11T12:20:45.069946376</dc:date>
    <meta:editing-cycles>236</meta:editing-cycles>
    <meta:editing-duration>PT12H4M9S</meta:editing-duration>
    <meta:generator>LibreOffice/26.2.4.2$Linux_X86_64 LibreOffice_project/64a984c51f4702dbd3710b13428c673a2f1292e7</meta:generator>
    <dc:title>Melchizedek-Melchisedec</dc:title>
    <meta:print-date>2025-06-30T18:58:47.382117617</meta:print-date>
    <meta:printed-by>PDF files</meta:printed-by>
    <meta:document-statistic meta:table-count="1" meta:image-count="0" meta:object-count="0" meta:page-count="3" meta:paragraph-count="85" meta:word-count="1139" meta:character-count="6365" meta:non-whitespace-character-count="5357"/>
    <meta:user-defined meta:name="AppVersion">15.0000</meta:user-defined>
  </office:meta>
</office:document-meta>
</file>