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background-color="#fff5c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hronicles 9:1 So all Israel were reckoned by genealogies; and, behold, they were written in the book of the kings of Israel and Judah, who were carried away to Babylon for their transgression.</text:p>
      <text:p text:style-name="Standard"/>
      <text:p text:style-name="Standard">2 Chronicles 20:34 Now the rest of the acts of Jehoshaphat, first and last, behold, they are written in the book of Jehu the son of Hanani, <text:span text:style-name="T1">who is mentioned in the book of the kings of Israel</text:span>.</text:p>
      <text:p text:style-name="Standard"/>
      <text:p text:style-name="Standard">2 Chronicles 27:7 ¶ Now the rest of the acts of Jotham, and all his wars, and his ways, lo, they are written in the book of the kings of Israel and Judah.</text:p>
      <text:p text:style-name="Standard"/>
      <text:p text:style-name="Standard">2 Chronicles 33:18 ¶ Now the rest of the acts of Manasseh, and his prayer unto his God, and the words of the seers that spake to him in the name of the LORD God of Israel, behold, they are written in the book of the kings of Israel.</text:p>
      <text:p text:style-name="Standard"/>
      <text:p text:style-name="Standard">2 Chronicles 35:27 And his deeds, first and last, behold, they are written in the book of the kings of Israel and Judah.</text:p>
      <text:p text:style-name="Standard"/>
      <text:p text:style-name="Standard">2 Chronicles 36:8 Now the rest of the acts of Jehoiakim, and his abominations which he did, and that which was found in him, behold, they are written in the book of the kings of Israel and Judah: and Jehoiachin his son reigned in his st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14:34:31.065164066</meta:creation-date>
    <dc:title>default</dc:title>
    <meta:editing-duration>PT1M2S</meta:editing-duration>
    <meta:editing-cycles>5</meta:editing-cycles>
    <meta:generator>LibreOffice/26.2.4.2$Linux_X86_64 LibreOffice_project/64a984c51f4702dbd3710b13428c673a2f1292e7</meta:generator>
    <dc:date>2026-07-11T12:30:02.027302447</dc:date>
    <meta:document-statistic meta:table-count="0" meta:image-count="0" meta:object-count="0" meta:page-count="1" meta:paragraph-count="6" meta:word-count="223" meta:character-count="1133" meta:non-whitespace-character-count="916"/>
    <meta:template xlink:type="simple" xlink:actuate="onRequest" xlink:title="default" xlink:href="../../../../Templates/default.ott" meta:date="2025-07-19T14:34:30.615134751"/>
  </office:meta>
</office:document-meta>
</file>