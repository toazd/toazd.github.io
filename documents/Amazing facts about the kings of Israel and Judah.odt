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Ubuntu" svg:font-family="Ubuntu"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75pt solid #000000"/>
    </style:style>
    <style:style style:name="Table6.2" style:family="table-row">
      <style:table-row-properties style:min-row-height="0.6549in"/>
    </style:style>
    <style:style style:name="Table6.A2" style:family="table-cell">
      <style:table-cell-properties fo:padding="0.0382in" fo:border-left="0.75pt solid #000000" fo:border-right="0.75pt solid #000000" fo:border-top="none" fo:border-bottom="0.7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75pt solid #000000"/>
    </style:style>
    <style:style style:name="Table7.A2" style:family="table-cell">
      <style:table-cell-properties fo:padding="0.0382in" fo:border-left="0.75pt solid #000000" fo:border-right="0.75pt solid #000000" fo:border-top="none" fo:border-bottom="0.7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1.A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0.2" style:family="table-row">
      <style:table-row-properties style:min-row-height="0.2583in"/>
    </style:style>
    <style:style style:name="Table10.A2" style:family="table-cell">
      <style:table-cell-properties fo:padding="0.0382in" fo:border-left="0.5pt solid #000000" fo:border-right="0.5pt solid #000000" fo:border-top="none" fo:border-bottom="0.5pt solid #000000"/>
    </style:style>
    <style:style style:name="Table13" style:family="table">
      <style:table-properties style:width="7.8972in" table:align="left"/>
    </style:style>
    <style:style style:name="Table13.A" style:family="table-column">
      <style:table-column-properties style:column-width="3.3181in"/>
    </style:style>
    <style:style style:name="Table13.B" style:family="table-column">
      <style:table-column-properties style:column-width="2.6563in"/>
    </style:style>
    <style:style style:name="Table13.C" style:family="table-column">
      <style:table-column-properties style:column-width="1.9229in"/>
    </style:style>
    <style:style style:name="Table13.A1" style:family="table-cell">
      <style:table-cell-properties style:vertical-align="middle" fo:padding="0.0382in" fo:border-left="0.5pt solid #000000" fo:border-right="none" fo:border-top="0.5pt solid #000000" fo:border-bottom="0.5pt solid #000000"/>
    </style:style>
    <style:style style:name="Table13.B1" style:family="table-cell">
      <style:table-cell-properties style:vertical-align="middle" fo:padding="0.0382in" fo:border-left="none" fo:border-right="none" fo:border-top="0.5pt solid #000000" fo:border-bottom="0.5pt solid #000000"/>
    </style:style>
    <style:style style:name="Table13.C1" style:family="table-cell">
      <style:table-cell-properties style:vertical-align="middle" fo:padding="0.0382in" fo:border-left="none" fo:border-right="0.5pt solid #000000" fo:border-top="0.5pt solid #000000" fo:border-bottom="0.5pt solid #000000"/>
    </style:style>
    <style:style style:name="Table13.A2" style:family="table-cell">
      <style:table-cell-properties style:vertical-align="middle" fo:padding="0.0382in" fo:border-left="0.5pt solid #000000" fo:border-right="none" fo:border-top="none" fo:border-bottom="0.5pt solid #000000"/>
    </style:style>
    <style:style style:name="Table13.B2" style:family="table-cell">
      <style:table-cell-properties style:vertical-align="" fo:padding="0.0382in" fo:border-left="none" fo:border-right="none" fo:border-top="none" fo:border-bottom="0.5pt solid #000000"/>
    </style:style>
    <style:style style:name="Table13.C2" style:family="table-cell">
      <style:table-cell-properties style:vertical-align="middle" fo:padding="0.0382in" fo:border-left="none" fo:border-right="0.5pt solid #000000" fo:border-top="none" fo:border-bottom="0.5pt solid #000000"/>
    </style:style>
    <style:style style:name="Table13.B3" style:family="table-cell">
      <style:table-cell-properties style:vertical-align="middle" fo:padding="0.0382in" fo:border-left="none" fo:border-right="none" fo:border-top="none" fo:border-bottom="0.5pt solid #000000"/>
    </style:style>
    <style:style style:name="P1" style:family="paragraph" style:parent-style-name="Text_20_body">
      <style:paragraph-properties fo:text-align="center" style:justify-single-word="false"/>
      <style:text-properties style:font-name="Gabriela Nerd Font" officeooo:rsid="000f2dbc" officeooo:paragraph-rsid="000f2dbc"/>
    </style:style>
    <style:style style:name="P2" style:family="paragraph" style:parent-style-name="Text_20_body">
      <style:paragraph-properties fo:text-align="center" style:justify-single-word="false"/>
      <style:text-properties style:font-name="Gabriela Nerd Font" fo:font-size="10pt" officeooo:rsid="002e75ea" officeooo:paragraph-rsid="002e75ea" style:font-size-asian="10pt" style:font-size-complex="10pt"/>
    </style:style>
    <style:style style:name="P3" style:family="paragraph" style:parent-style-name="Text_20_body">
      <style:paragraph-properties fo:text-align="left" style:justify-single-word="false"/>
      <style:text-properties officeooo:rsid="000f2dbc" officeooo:paragraph-rsid="000f2dbc"/>
    </style:style>
    <style:style style:name="P4" style:family="paragraph" style:parent-style-name="Text_20_body">
      <style:paragraph-properties fo:text-align="left" style:justify-single-word="false"/>
      <style:text-properties officeooo:rsid="0010641b" officeooo:paragraph-rsid="0010641b"/>
    </style:style>
    <style:style style:name="P5" style:family="paragraph">
      <style:paragraph-properties fo:margin-left="0in" fo:margin-right="0in" fo:margin-top="0in" fo:margin-bottom="0in" fo:line-height="100%" fo:text-align="right" fo:text-indent="0in"/>
    </style:style>
    <style:style style:name="P6"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1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align="left" fo:text-indent="0in"/>
    </style:style>
    <style:style style:name="P12"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align="center" fo:text-indent="0in"/>
    </style:style>
    <style:style style:name="P1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P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P17" style:family="paragraph" style:parent-style-name="Text_20_body">
      <style:paragraph-properties fo:text-align="left" style:justify-single-word="false"/>
      <style:text-properties officeooo:rsid="00144481" officeooo:paragraph-rsid="00144481"/>
    </style:style>
    <style:style style:name="P18" style:family="paragraph" style:parent-style-name="Standard">
      <style:paragraph-properties fo:text-align="center" style:justify-single-word="false"/>
      <style:text-properties style:font-name="Gabriela Nerd Font" fo:font-size="12pt" officeooo:rsid="00fd0327" officeooo:paragraph-rsid="00fd0327" style:font-size-asian="12pt" style:font-size-complex="12pt"/>
    </style:style>
    <style:style style:name="P19" style:family="paragraph" style:parent-style-name="Table_20_Contents">
      <style:paragraph-properties fo:text-align="left" style:justify-single-word="false"/>
      <style:text-properties officeooo:paragraph-rsid="01ab69f8"/>
    </style:style>
    <style:style style:name="P20" style:family="paragraph" style:parent-style-name="Text_20_body">
      <style:paragraph-properties fo:text-align="left" style:justify-single-word="false"/>
      <style:text-properties officeooo:rsid="0025d363" officeooo:paragraph-rsid="003e35cb"/>
    </style:style>
    <style:style style:name="P21" style:family="paragraph" style:parent-style-name="Text_20_body" style:list-style-name="L1">
      <style:paragraph-properties fo:text-align="left" style:justify-single-word="false"/>
      <style:text-properties officeooo:rsid="0047363f" officeooo:paragraph-rsid="0047363f"/>
    </style:style>
    <style:style style:name="P22" style:family="paragraph" style:parent-style-name="Text_20_body" style:list-style-name="L1">
      <style:paragraph-properties fo:text-align="left" style:justify-single-word="false"/>
      <style:text-properties officeooo:rsid="00495bae" officeooo:paragraph-rsid="00495bae"/>
    </style:style>
    <style:style style:name="P23" style:family="paragraph" style:parent-style-name="Text_20_body" style:list-style-name="L1">
      <style:paragraph-properties fo:text-align="left" style:justify-single-word="false"/>
      <style:text-properties officeooo:rsid="0049d13d" officeooo:paragraph-rsid="0049d13d"/>
    </style:style>
    <style:style style:name="P24" style:family="paragraph" style:parent-style-name="Text_20_body">
      <style:paragraph-properties fo:text-align="left" style:justify-single-word="false"/>
      <style:text-properties officeooo:rsid="004b8b4c" officeooo:paragraph-rsid="004b8b4c"/>
    </style:style>
    <style:style style:name="P25" style:family="paragraph" style:parent-style-name="Table_20_Contents">
      <style:paragraph-properties fo:text-align="left" style:justify-single-word="false"/>
      <style:text-properties fo:color="#127622" loext:opacity="100%" officeooo:paragraph-rsid="004edb6f"/>
    </style:style>
    <style:style style:name="P26" style:family="paragraph" style:parent-style-name="Table_20_Contents">
      <style:paragraph-properties fo:text-align="left" style:justify-single-word="false"/>
      <style:text-properties officeooo:paragraph-rsid="004edb6f"/>
    </style:style>
    <style:style style:name="P27" style:family="paragraph" style:parent-style-name="Text_20_body" style:list-style-name="L2">
      <style:paragraph-properties fo:text-align="left" style:justify-single-word="false"/>
      <style:text-properties officeooo:rsid="00522bf3" officeooo:paragraph-rsid="00522bf3"/>
    </style:style>
    <style:style style:name="P28" style:family="paragraph" style:parent-style-name="Text_20_body">
      <style:paragraph-properties fo:text-align="left" style:justify-single-word="false"/>
      <style:text-properties officeooo:rsid="00522bf3" officeooo:paragraph-rsid="00522bf3"/>
    </style:style>
    <style:style style:name="P29" style:family="paragraph" style:parent-style-name="Table_20_Contents">
      <style:paragraph-properties fo:text-align="left" style:justify-single-word="false"/>
    </style:style>
    <style:style style:name="P30" style:family="paragraph" style:parent-style-name="Text_20_body" style:list-style-name="L3">
      <style:paragraph-properties fo:text-align="left" style:justify-single-word="false"/>
      <style:text-properties officeooo:rsid="005c2a08" officeooo:paragraph-rsid="005c2a08"/>
    </style:style>
    <style:style style:name="P31" style:family="paragraph" style:parent-style-name="Text_20_body" style:list-style-name="L3">
      <style:paragraph-properties fo:text-align="left" style:justify-single-word="false"/>
      <style:text-properties officeooo:rsid="005c2a08" officeooo:paragraph-rsid="005c7306"/>
    </style:style>
    <style:style style:name="P32" style:family="paragraph" style:parent-style-name="Text_20_body" style:list-style-name="L3">
      <style:paragraph-properties fo:text-align="left" style:justify-single-word="false"/>
      <style:text-properties officeooo:rsid="0063e9e4" officeooo:paragraph-rsid="0063e9e4"/>
    </style:style>
    <style:style style:name="P33"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38" style:family="paragraph">
      <loext:graphic-properties draw:fill="solid" draw:fill-color="#ec9ba4"/>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2"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7"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0" style:family="paragraph">
      <loext:graphic-properties draw:fill="solid" draw:fill-color="#ec9ba4"/>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2" style:family="paragraph">
      <loext:graphic-properties draw:fill="solid" draw:fill-color="#fff5ce"/>
      <style:paragraph-properties fo:margin-left="0in" fo:margin-right="0in" fo:margin-top="0in" fo:margin-bottom="0in" fo:line-height="100%" fo:text-align="left"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6"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5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6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6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63" style:family="paragraph" style:parent-style-name="Table_20_Contents">
      <style:paragraph-properties fo:text-align="left" style:justify-single-word="false"/>
      <style:text-properties fo:color="#127622" loext:opacity="100%" officeooo:paragraph-rsid="0069b6d5"/>
    </style:style>
    <style:style style:name="P64" style:family="paragraph" style:parent-style-name="Table_20_Contents">
      <style:paragraph-properties fo:text-align="left" style:justify-single-word="false"/>
      <style:text-properties officeooo:paragraph-rsid="0069b6d5"/>
    </style:style>
    <style:style style:name="P65" style:family="paragraph" style:parent-style-name="Table_20_Contents">
      <style:paragraph-properties fo:text-align="left" style:justify-single-word="false"/>
      <style:text-properties fo:color="#127622" loext:opacity="100%" officeooo:paragraph-rsid="0069cf7f"/>
    </style:style>
    <style:style style:name="P66" style:family="paragraph" style:parent-style-name="Table_20_Contents">
      <style:paragraph-properties fo:text-align="left" style:justify-single-word="false"/>
      <style:text-properties officeooo:paragraph-rsid="0069cf7f"/>
    </style:style>
    <style:style style:name="P67" style:family="paragraph" style:parent-style-name="Text_20_body" style:list-style-name="L4">
      <style:paragraph-properties fo:text-align="left" style:justify-single-word="false"/>
      <style:text-properties officeooo:rsid="006cc5da" officeooo:paragraph-rsid="006cc5da"/>
    </style:style>
    <style:style style:name="P68" style:family="paragraph" style:parent-style-name="Text_20_body" style:list-style-name="L4">
      <style:paragraph-properties fo:text-align="left" style:justify-single-word="false"/>
      <style:text-properties fo:font-style="normal" officeooo:rsid="00a78e23" officeooo:paragraph-rsid="00a78e23" style:font-style-asian="normal" style:font-style-complex="normal"/>
    </style:style>
    <style:style style:name="P69" style:family="paragraph" style:parent-style-name="Text_20_body" style:list-style-name="L4">
      <style:paragraph-properties fo:text-align="left" style:justify-single-word="false"/>
      <style:text-properties fo:font-style="normal" officeooo:rsid="006cfba8" officeooo:paragraph-rsid="006cfba8" style:font-style-asian="normal" style:font-style-complex="normal"/>
    </style:style>
    <style:style style:name="P70" style:family="paragraph" style:parent-style-name="Text_20_body" style:list-style-name="L4">
      <style:paragraph-properties fo:text-align="left" style:justify-single-word="false"/>
      <style:text-properties fo:font-style="normal" fo:font-weight="normal" officeooo:rsid="0070242f" officeooo:paragraph-rsid="007bcce2" style:font-style-asian="normal" style:font-weight-asian="normal" style:font-style-complex="normal" style:font-weight-complex="normal"/>
    </style:style>
    <style:style style:name="P71" style:family="paragraph" style:parent-style-name="Text_20_body">
      <style:paragraph-properties fo:text-align="left" style:justify-single-word="false"/>
      <style:text-properties fo:font-style="normal" fo:font-weight="normal" officeooo:rsid="00712deb" officeooo:paragraph-rsid="00712deb" style:font-style-asian="normal" style:font-weight-asian="normal" style:font-style-complex="normal" style:font-weight-complex="normal"/>
    </style:style>
    <style:style style:name="P72" style:family="paragraph" style:parent-style-name="Table_20_Contents">
      <style:paragraph-properties fo:text-align="left" style:justify-single-word="false"/>
      <style:text-properties fo:color="#127622" loext:opacity="100%" officeooo:paragraph-rsid="0074f53e"/>
    </style:style>
    <style:style style:name="P73" style:family="paragraph" style:parent-style-name="Table_20_Contents">
      <style:paragraph-properties fo:text-align="left" style:justify-single-word="false"/>
      <style:text-properties officeooo:paragraph-rsid="0074f53e"/>
    </style:style>
    <style:style style:name="P74" style:family="paragraph" style:parent-style-name="Text_20_body" style:list-style-name="L5">
      <style:paragraph-properties fo:text-align="left" style:justify-single-word="false"/>
      <style:text-properties fo:font-style="normal" fo:font-weight="normal" officeooo:rsid="0077fa2d" officeooo:paragraph-rsid="0077fa2d" style:font-style-asian="normal" style:font-weight-asian="normal" style:font-style-complex="normal" style:font-weight-complex="normal"/>
    </style:style>
    <style:style style:name="P75" style:family="paragraph" style:parent-style-name="Text_20_body">
      <style:paragraph-properties fo:text-align="left" style:justify-single-word="false"/>
      <style:text-properties fo:font-style="normal" fo:font-weight="normal" officeooo:rsid="0079b163" officeooo:paragraph-rsid="00844814" style:font-style-asian="normal" style:font-weight-asian="normal" style:font-style-complex="normal" style:font-weight-complex="normal"/>
    </style:style>
    <style:style style:name="P76" style:family="paragraph" style:parent-style-name="Text_20_body">
      <style:paragraph-properties fo:text-align="left" style:justify-single-word="false"/>
      <style:text-properties fo:font-style="normal" fo:font-weight="normal" officeooo:rsid="008a822e" officeooo:paragraph-rsid="008a822e" style:font-style-asian="normal" style:font-weight-asian="normal" style:font-style-complex="normal" style:font-weight-complex="normal"/>
    </style:style>
    <style:style style:name="P77" style:family="paragraph" style:parent-style-name="Table_20_Contents">
      <style:paragraph-properties fo:text-align="left" style:justify-single-word="false"/>
      <style:text-properties fo:color="#127622" loext:opacity="100%" officeooo:paragraph-rsid="008b5e34"/>
    </style:style>
    <style:style style:name="P78" style:family="paragraph" style:parent-style-name="Table_20_Contents">
      <style:paragraph-properties fo:text-align="left" style:justify-single-word="false"/>
      <style:text-properties officeooo:paragraph-rsid="008b5e34"/>
    </style:style>
    <style:style style:name="P79" style:family="paragraph" style:parent-style-name="Text_20_body" style:list-style-name="L6">
      <style:paragraph-properties fo:text-align="left" style:justify-single-word="false"/>
      <style:text-properties fo:font-style="normal" fo:font-weight="normal" officeooo:rsid="008ec779" officeooo:paragraph-rsid="008ec779" style:font-style-asian="normal" style:font-weight-asian="normal" style:font-style-complex="normal" style:font-weight-complex="normal"/>
    </style:style>
    <style:style style:name="P80" style:family="paragraph" style:parent-style-name="Text_20_body" style:list-style-name="L6">
      <style:paragraph-properties fo:text-align="left" style:justify-single-word="false"/>
      <style:text-properties fo:font-style="normal" fo:font-weight="normal" officeooo:rsid="008dff44" officeooo:paragraph-rsid="00c029da" style:font-style-asian="normal" style:font-weight-asian="normal" style:font-style-complex="normal" style:font-weight-complex="normal"/>
    </style:style>
    <style:style style:name="P81" style:family="paragraph" style:parent-style-name="Text_20_body" style:list-style-name="L6">
      <style:paragraph-properties fo:text-align="left" style:justify-single-word="false"/>
      <style:text-properties fo:font-style="normal" fo:font-weight="normal" officeooo:rsid="00be2f07" officeooo:paragraph-rsid="00c029da" style:font-style-asian="normal" style:font-weight-asian="normal" style:font-style-complex="normal" style:font-weight-complex="normal"/>
    </style:style>
    <style:style style:name="P82" style:family="paragraph" style:parent-style-name="Text_20_body">
      <style:paragraph-properties fo:text-align="left" style:justify-single-word="false"/>
      <style:text-properties fo:font-style="normal" fo:font-weight="normal" officeooo:rsid="00956bb0" officeooo:paragraph-rsid="00b6e847" style:font-style-asian="normal" style:font-weight-asian="normal" style:font-style-complex="normal" style:font-weight-complex="normal"/>
    </style:style>
    <style:style style:name="P83" style:family="paragraph" style:parent-style-name="Text_20_body">
      <style:paragraph-properties fo:text-align="left" style:justify-single-word="false"/>
      <style:text-properties officeooo:paragraph-rsid="00b81f21"/>
    </style:style>
    <style:style style:name="P84" style:family="paragraph" style:parent-style-name="Text_20_body">
      <style:paragraph-properties fo:text-align="left" style:justify-single-word="false"/>
      <style:text-properties fo:font-style="normal" fo:font-weight="normal" officeooo:rsid="00956bb0" officeooo:paragraph-rsid="01f50ac2" style:font-style-asian="normal" style:font-weight-asian="normal" style:font-style-complex="normal" style:font-weight-complex="normal"/>
    </style:style>
    <style:style style:name="P85" style:family="paragraph" style:parent-style-name="Text_20_body">
      <style:paragraph-properties fo:text-align="left" style:justify-single-word="false"/>
      <style:text-properties fo:font-style="normal" fo:font-weight="normal" officeooo:rsid="00956bb0" officeooo:paragraph-rsid="00b8df3b" style:font-style-asian="normal" style:font-weight-asian="normal" style:font-style-complex="normal" style:font-weight-complex="normal"/>
    </style:style>
    <style:style style:name="P86" style:family="paragraph" style:parent-style-name="Text_20_body">
      <style:paragraph-properties fo:text-align="left" style:justify-single-word="false"/>
      <style:text-properties fo:font-style="normal" fo:font-weight="normal" officeooo:rsid="00956bb0" officeooo:paragraph-rsid="00bab90c" style:font-style-asian="normal" style:font-weight-asian="normal" style:font-style-complex="normal" style:font-weight-complex="normal"/>
    </style:style>
    <style:style style:name="P87" style:family="paragraph" style:parent-style-name="Text_20_body">
      <style:paragraph-properties fo:text-align="left" style:justify-single-word="false"/>
      <style:text-properties fo:font-style="normal" fo:font-weight="normal" officeooo:rsid="01f1dbdd" officeooo:paragraph-rsid="01f1dbdd" style:font-style-asian="normal" style:font-weight-asian="normal" style:font-style-complex="normal" style:font-weight-complex="normal"/>
    </style:style>
    <style:style style:name="P88" style:family="paragraph" style:parent-style-name="Text_20_body" style:list-style-name="L7">
      <style:paragraph-properties fo:text-align="left" style:justify-single-word="false"/>
      <style:text-properties fo:font-style="normal" fo:font-weight="normal" officeooo:rsid="01f1dbdd" officeooo:paragraph-rsid="01f1dbdd" style:font-style-asian="normal" style:font-weight-asian="normal" style:font-style-complex="normal" style:font-weight-complex="normal"/>
    </style:style>
    <style:style style:name="P89" style:family="paragraph" style:parent-style-name="Text_20_body" style:list-style-name="L7">
      <style:paragraph-properties fo:text-align="left" style:justify-single-word="false"/>
      <style:text-properties fo:font-style="normal" fo:font-weight="normal" officeooo:rsid="01f82bd2" officeooo:paragraph-rsid="01f82bd2" style:font-style-asian="normal" style:font-weight-asian="normal" style:font-style-complex="normal" style:font-weight-complex="normal"/>
    </style:style>
    <style:style style:name="P90" style:family="paragraph" style:parent-style-name="Text_20_body" style:list-style-name="L7">
      <style:paragraph-properties fo:text-align="left" style:justify-single-word="false"/>
      <style:text-properties fo:font-style="normal" fo:font-weight="normal" officeooo:rsid="01f1dbdd" officeooo:paragraph-rsid="0201a4e6" style:font-style-asian="normal" style:font-weight-asian="normal" style:font-style-complex="normal" style:font-weight-complex="normal"/>
    </style:style>
    <style:style style:name="P91" style:family="paragraph" style:parent-style-name="Text_20_body" style:list-style-name="L7">
      <style:paragraph-properties fo:text-align="left" style:justify-single-word="false"/>
      <style:text-properties fo:font-style="normal" fo:font-weight="normal" officeooo:rsid="01f82bd2" officeooo:paragraph-rsid="020609ce" style:font-style-asian="normal" style:font-weight-asian="normal" style:font-style-complex="normal" style:font-weight-complex="normal"/>
    </style:style>
    <style:style style:name="P92" style:family="paragraph" style:parent-style-name="Text_20_body" style:list-style-name="L7">
      <style:paragraph-properties fo:text-align="left" style:justify-single-word="false"/>
      <style:text-properties fo:font-style="normal" fo:font-weight="normal" officeooo:rsid="01faf4b8" officeooo:paragraph-rsid="01faf4b8" style:font-style-asian="normal" style:font-weight-asian="normal" style:font-style-complex="normal" style:font-weight-complex="normal"/>
    </style:style>
    <style:style style:name="P93" style:family="paragraph" style:parent-style-name="Text_20_body">
      <style:paragraph-properties fo:text-align="left" style:justify-single-word="false"/>
      <style:text-properties fo:font-style="normal" fo:font-weight="normal" officeooo:rsid="02078716" officeooo:paragraph-rsid="02078716" style:font-style-asian="normal" style:font-weight-asian="normal" style:font-style-complex="normal" style:font-weight-complex="normal"/>
    </style:style>
    <style:style style:name="P94" style:family="paragraph" style:parent-style-name="Standard">
      <style:paragraph-properties fo:text-align="center" style:justify-single-word="false"/>
      <style:text-properties officeooo:rsid="00fd0327" officeooo:paragraph-rsid="01048cce"/>
    </style:style>
    <style:style style:name="P95" style:family="paragraph" style:parent-style-name="Table_20_Contents">
      <style:paragraph-properties fo:text-align="left" style:justify-single-word="false"/>
      <style:text-properties fo:color="#127622" loext:opacity="100%" officeooo:paragraph-rsid="01130981"/>
    </style:style>
    <style:style style:name="P96" style:family="paragraph" style:parent-style-name="Table_20_Contents">
      <style:paragraph-properties fo:text-align="left" style:justify-single-word="false"/>
      <style:text-properties fo:color="#127622" loext:opacity="100%" officeooo:paragraph-rsid="0114a5c3"/>
    </style:style>
    <style:style style:name="P97" style:family="paragraph" style:parent-style-name="Table_20_Contents">
      <style:paragraph-properties fo:text-align="left" style:justify-single-word="false"/>
      <style:text-properties officeooo:paragraph-rsid="0114a5c3"/>
    </style:style>
    <style:style style:name="P98" style:family="paragraph" style:parent-style-name="Standard" style:list-style-name="L8">
      <style:text-properties officeooo:rsid="010b2a90" officeooo:paragraph-rsid="010b2a90"/>
    </style:style>
    <style:style style:name="P99" style:family="paragraph" style:parent-style-name="Standard" style:list-style-name="L8">
      <style:text-properties officeooo:rsid="012019a3" officeooo:paragraph-rsid="0139bfc4"/>
    </style:style>
    <style:style style:name="P100" style:family="paragraph" style:parent-style-name="Standard" style:list-style-name="L8">
      <style:text-properties officeooo:paragraph-rsid="0139bfc4"/>
    </style:style>
    <style:style style:name="P101" style:family="paragraph" style:parent-style-name="Standard">
      <style:text-properties officeooo:rsid="010da769" officeooo:paragraph-rsid="010da769"/>
    </style:style>
    <style:style style:name="P102" style:family="paragraph" style:parent-style-name="Standard" style:list-style-name="L9">
      <style:text-properties officeooo:rsid="0111328c" officeooo:paragraph-rsid="0111328c"/>
    </style:style>
    <style:style style:name="P103" style:family="paragraph" style:parent-style-name="Standard" style:list-style-name="L9">
      <style:text-properties officeooo:rsid="0111699a" officeooo:paragraph-rsid="0111699a"/>
    </style:style>
    <style:style style:name="P104" style:family="paragraph" style:parent-style-name="Standard" style:list-style-name="L9">
      <style:text-properties officeooo:rsid="0115dd4d" officeooo:paragraph-rsid="0115dd4d"/>
    </style:style>
    <style:style style:name="P105" style:family="paragraph" style:parent-style-name="Standard" style:list-style-name="L9">
      <style:text-properties officeooo:rsid="01524b94" officeooo:paragraph-rsid="01524b94"/>
    </style:style>
    <style:style style:name="P106" style:family="paragraph" style:parent-style-name="Standard" style:list-style-name="L9">
      <style:text-properties officeooo:rsid="0152e713" officeooo:paragraph-rsid="0152e713"/>
    </style:style>
    <style:style style:name="P107" style:family="paragraph" style:parent-style-name="Standard" style:list-style-name="L9">
      <style:text-properties officeooo:rsid="0116e607" officeooo:paragraph-rsid="011a2720"/>
    </style:style>
    <style:style style:name="P108" style:family="paragraph" style:parent-style-name="Standard" style:list-style-name="L9">
      <style:text-properties officeooo:rsid="011a2720" officeooo:paragraph-rsid="0154f074"/>
    </style:style>
    <style:style style:name="P109" style:family="paragraph" style:parent-style-name="Standard" style:list-style-name="L9">
      <style:text-properties officeooo:rsid="0155c5f6" officeooo:paragraph-rsid="0155c5f6"/>
    </style:style>
    <style:style style:name="P110" style:family="paragraph" style:parent-style-name="Standard" style:list-style-name="L9">
      <style:text-properties officeooo:rsid="0116e607" officeooo:paragraph-rsid="0155c5f6"/>
    </style:style>
    <style:style style:name="P111" style:family="paragraph" style:parent-style-name="Standard" style:list-style-name="L9">
      <style:text-properties officeooo:paragraph-rsid="011f963a"/>
    </style:style>
    <style:style style:name="P112" style:family="paragraph" style:parent-style-name="Standard" style:list-style-name="L9">
      <style:text-properties officeooo:rsid="01d78c0f" officeooo:paragraph-rsid="01d78c0f"/>
    </style:style>
    <style:style style:name="P113" style:family="paragraph" style:parent-style-name="Standard">
      <style:text-properties officeooo:paragraph-rsid="011f963a"/>
    </style:style>
    <style:style style:name="P114" style:family="paragraph" style:parent-style-name="Table_20_Contents">
      <style:paragraph-properties fo:text-align="left" style:justify-single-word="false"/>
      <style:text-properties fo:color="#127622" loext:opacity="100%" officeooo:paragraph-rsid="013fdbc4"/>
    </style:style>
    <style:style style:name="P115" style:family="paragraph" style:parent-style-name="Table_20_Contents">
      <style:paragraph-properties fo:text-align="left" style:justify-single-word="false"/>
      <style:text-properties officeooo:paragraph-rsid="013fdbc4"/>
    </style:style>
    <style:style style:name="P116" style:family="paragraph" style:parent-style-name="Standard" style:list-style-name="L10">
      <style:text-properties officeooo:rsid="01424ea3" officeooo:paragraph-rsid="01424ea3"/>
    </style:style>
    <style:style style:name="P117" style:family="paragraph" style:parent-style-name="Standard">
      <style:text-properties officeooo:rsid="01424ea3" officeooo:paragraph-rsid="01424ea3"/>
    </style:style>
    <style:style style:name="P118" style:family="paragraph" style:parent-style-name="Standard">
      <style:text-properties officeooo:rsid="012e463c" officeooo:paragraph-rsid="012e463c"/>
    </style:style>
    <style:style style:name="P119" style:family="paragraph" style:parent-style-name="Standard">
      <style:paragraph-properties fo:text-align="center" style:justify-single-word="false"/>
      <style:text-properties officeooo:rsid="015e492d" officeooo:paragraph-rsid="015e492d"/>
    </style:style>
    <style:style style:name="P120" style:family="paragraph">
      <loext:graphic-properties draw:fill="solid" draw:fill-color="#729fcf"/>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6"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0" style:family="paragraph">
      <loext:graphic-properties draw:fill="solid" draw:fill-color="#729fcf"/>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3" style:family="paragraph">
      <loext:graphic-properties draw:fill="solid" draw:fill-color="#fff5ce"/>
      <style:paragraph-properties fo:margin-left="0in" fo:margin-right="0in" fo:margin-top="0in" fo:margin-bottom="0in" fo:line-height="100%" fo:text-align="left" fo:text-indent="0in" style:writing-mode="lr-tb"/>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5" style:family="paragraph">
      <loext:graphic-properties draw:fill="solid" draw:fill-color="#fff5ce"/>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7" style:family="paragraph">
      <loext:graphic-properties draw:fill="solid" draw:fill-color="#5983b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8" style:family="paragraph">
      <loext:graphic-properties draw:fill="solid" draw:fill-color="#729fcf"/>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9" style:family="paragraph">
      <loext:graphic-properties draw:fill="solid" draw:fill-color="#729fcf"/>
      <style:paragraph-properties fo:margin-left="0in" fo:margin-right="0in" fo:margin-top="0in" fo:margin-bottom="0in" fo:line-height="100%" fo:text-align="lef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140"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41"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2" style:family="paragraph">
      <loext:graphic-properties draw:fill="none" draw:fill-color="#729fcf"/>
      <style:paragraph-properties fo:margin-left="0in" fo:margin-right="0in" fo:margin-top="0in" fo:margin-bottom="0in" fo:line-height="100%" fo:text-align="right"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3" style:family="paragraph">
      <loext:graphic-properties draw:fill="none" draw:fill-color="#729fcf"/>
      <style:paragraph-properties fo:margin-left="0in" fo:margin-right="0in" fo:margin-top="0in" fo:margin-bottom="0in" fo:line-height="100%" fo:text-align="lef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4" style:family="paragraph" style:parent-style-name="Standard">
      <style:text-properties officeooo:rsid="015f0771" officeooo:paragraph-rsid="015f0771"/>
    </style:style>
    <style:style style:name="P145" style:family="paragraph" style:parent-style-name="Table_20_Contents">
      <style:paragraph-properties fo:text-align="left" style:justify-single-word="false"/>
      <style:text-properties fo:color="#127622" loext:opacity="100%" officeooo:paragraph-rsid="0166acdf"/>
    </style:style>
    <style:style style:name="P146" style:family="paragraph" style:parent-style-name="Table_20_Contents">
      <style:paragraph-properties fo:text-align="left" style:justify-single-word="false"/>
      <style:text-properties officeooo:paragraph-rsid="0166acdf"/>
    </style:style>
    <style:style style:name="P147" style:family="paragraph" style:parent-style-name="Table_20_Contents">
      <style:paragraph-properties fo:text-align="left" style:justify-single-word="false"/>
      <style:text-properties fo:color="#127622" loext:opacity="100%" officeooo:paragraph-rsid="016976a8"/>
    </style:style>
    <style:style style:name="P148" style:family="paragraph" style:parent-style-name="Table_20_Contents">
      <style:paragraph-properties fo:text-align="left" style:justify-single-word="false"/>
      <style:text-properties officeooo:paragraph-rsid="016976a8"/>
    </style:style>
    <style:style style:name="P149" style:family="paragraph" style:parent-style-name="Standard" style:list-style-name="L11">
      <style:text-properties officeooo:rsid="016bf144" officeooo:paragraph-rsid="016bf144"/>
    </style:style>
    <style:style style:name="P150" style:family="paragraph" style:parent-style-name="Standard" style:list-style-name="L11">
      <style:text-properties officeooo:rsid="01e1f69b" officeooo:paragraph-rsid="01e1f69b"/>
    </style:style>
    <style:style style:name="P151" style:family="paragraph" style:parent-style-name="Standard">
      <style:text-properties officeooo:rsid="012e463c" officeooo:paragraph-rsid="016dc5c0"/>
    </style:style>
    <style:style style:name="P152" style:family="paragraph" style:parent-style-name="Default_20_Drawing_20_Style">
      <style:text-properties fo:color="#127622" loext:opacity="100%" officeooo:paragraph-rsid="016dc5c0"/>
    </style:style>
    <style:style style:name="P153" style:family="paragraph" style:parent-style-name="Default_20_Drawing_20_Style">
      <style:text-properties officeooo:paragraph-rsid="016dc5c0"/>
    </style:style>
    <style:style style:name="P154" style:family="paragraph" style:parent-style-name="Standard" style:list-style-name="L12">
      <style:text-properties officeooo:rsid="012e2ee2" officeooo:paragraph-rsid="016df4fd"/>
    </style:style>
    <style:style style:name="P155" style:family="paragraph" style:parent-style-name="Standard">
      <style:text-properties officeooo:rsid="016ecd08" officeooo:paragraph-rsid="016ecd08"/>
    </style:style>
    <style:style style:name="P156" style:family="paragraph" style:parent-style-name="Standard">
      <style:paragraph-properties fo:text-align="center" style:justify-single-word="false"/>
      <style:text-properties officeooo:rsid="01c1768c" officeooo:paragraph-rsid="01c1768c"/>
    </style:style>
    <style:style style:name="P157" style:family="paragraph" style:parent-style-name="Table_20_Contents">
      <style:text-properties officeooo:paragraph-rsid="01ab69f8"/>
    </style:style>
    <style:style style:name="P158" style:family="paragraph" style:parent-style-name="Table_20_Contents">
      <style:text-properties officeooo:rsid="01728044" officeooo:paragraph-rsid="01728044"/>
    </style:style>
    <style:style style:name="P159" style:family="paragraph" style:parent-style-name="Table_20_Contents">
      <style:text-properties officeooo:rsid="01740f6b" officeooo:paragraph-rsid="01740f6b"/>
    </style:style>
    <style:style style:name="P160" style:family="paragraph" style:parent-style-name="Table_20_Contents">
      <style:text-properties officeooo:rsid="0174ad4c" officeooo:paragraph-rsid="0174ad4c"/>
    </style:style>
    <style:style style:name="P161" style:family="paragraph" style:parent-style-name="Table_20_Contents">
      <style:text-properties officeooo:rsid="017798ab" officeooo:paragraph-rsid="017798ab"/>
    </style:style>
    <style:style style:name="P162" style:family="paragraph" style:parent-style-name="Table_20_Contents">
      <style:text-properties officeooo:rsid="017f2a51" officeooo:paragraph-rsid="017f2a51"/>
    </style:style>
    <style:style style:name="P163" style:family="paragraph" style:parent-style-name="Table_20_Contents">
      <style:text-properties fo:color="#127622" loext:opacity="100%" officeooo:paragraph-rsid="01a3bf48"/>
    </style:style>
    <style:style style:name="P164" style:family="paragraph" style:parent-style-name="Table_20_Contents">
      <style:text-properties officeooo:paragraph-rsid="01a3bf48"/>
    </style:style>
    <style:style style:name="P165" style:family="paragraph" style:parent-style-name="Table_20_Contents">
      <style:text-properties officeooo:rsid="01766387" officeooo:paragraph-rsid="01766387"/>
    </style:style>
    <style:style style:name="P166" style:family="paragraph" style:parent-style-name="Standard">
      <style:text-properties officeooo:paragraph-rsid="018c3801"/>
    </style:style>
    <style:style style:name="P167" style:family="paragraph" style:parent-style-name="Standard">
      <style:text-properties officeooo:rsid="018f44d7" officeooo:paragraph-rsid="018f44d7"/>
    </style:style>
    <style:style style:name="P168" style:family="paragraph" style:parent-style-name="Standard">
      <style:text-properties fo:font-weight="normal" officeooo:rsid="018f44d7" officeooo:paragraph-rsid="018f44d7" style:font-weight-asian="normal" style:font-weight-complex="normal"/>
    </style:style>
    <style:style style:name="P169" style:family="paragraph" style:parent-style-name="Standard">
      <style:text-properties fo:font-weight="normal" officeooo:rsid="01900743" officeooo:paragraph-rsid="01900743" style:font-weight-asian="normal" style:font-weight-complex="normal"/>
    </style:style>
    <style:style style:name="P170" style:family="paragraph" style:parent-style-name="Standard">
      <style:text-properties fo:font-weight="normal" officeooo:rsid="01af5420" officeooo:paragraph-rsid="01af5420" style:font-weight-asian="normal" style:font-weight-complex="normal"/>
    </style:style>
    <style:style style:name="P171" style:family="paragraph" style:parent-style-name="Standard">
      <style:text-properties officeooo:paragraph-rsid="01d1d2e3"/>
    </style:style>
    <style:style style:name="P172" style:family="paragraph" style:parent-style-name="Standard">
      <style:text-properties fo:font-weight="normal" officeooo:rsid="01cd5005" officeooo:paragraph-rsid="01d1d2e3" style:font-weight-asian="normal" style:font-weight-complex="normal"/>
    </style:style>
    <style:style style:name="P173" style:family="paragraph" style:parent-style-name="Standard">
      <style:text-properties fo:font-weight="normal" officeooo:rsid="01902fea" officeooo:paragraph-rsid="019817cc" style:font-weight-asian="normal" style:font-weight-complex="normal"/>
    </style:style>
    <style:style style:name="P174" style:family="paragraph" style:parent-style-name="Standard" style:list-style-name="L13">
      <style:text-properties fo:font-weight="normal" officeooo:rsid="019817cc" officeooo:paragraph-rsid="019817cc" style:font-weight-asian="normal" style:font-weight-complex="normal"/>
    </style:style>
    <style:style style:name="P175" style:family="paragraph" style:parent-style-name="Standard" style:list-style-name="L13">
      <style:text-properties officeooo:paragraph-rsid="019817cc"/>
    </style:style>
    <style:style style:name="P176" style:family="paragraph" style:parent-style-name="Standard" style:list-style-name="L13">
      <style:text-properties fo:font-weight="normal" officeooo:rsid="01d3e5c4" officeooo:paragraph-rsid="01d3e5c4" style:font-weight-asian="normal" style:font-weight-complex="normal"/>
    </style:style>
    <style:style style:name="P177" style:family="paragraph" style:parent-style-name="Standard" style:list-style-name="L13">
      <style:text-properties fo:font-weight="normal" officeooo:rsid="01e98d1f" officeooo:paragraph-rsid="01e98d1f" style:font-weight-asian="normal" style:font-weight-complex="normal"/>
    </style:style>
    <style:style style:name="T1" style:family="text">
      <style:text-properties officeooo:rsid="0010cf75"/>
    </style:style>
    <style:style style:name="T2" style:family="text">
      <style:text-properties officeooo:rsid="001229da"/>
    </style:style>
    <style:style style:name="T3" style:family="text">
      <style:text-properties officeooo:rsid="0015e41e"/>
    </style:style>
    <style:style style:name="T4" style:family="text">
      <style:text-properties fo:color="#127622" loext:opacity="100%" officeooo:rsid="001229da"/>
    </style:style>
    <style:style style:name="T5" style:family="text">
      <style:text-properties officeooo:rsid="0012a048"/>
    </style:style>
    <style:style style:name="T6" style:family="text">
      <style:text-properties officeooo:rsid="0016f2c0"/>
    </style:style>
    <style:style style:name="T7"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2pt" style:font-style-asian="normal" style:font-weight-asian="normal"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12" style:family="text">
      <style:text-properties style:text-position="super 58%" officeooo:rsid="0016f2c0"/>
    </style:style>
    <style:style style:name="T13" style:family="text">
      <style:text-properties officeooo:rsid="001becd2"/>
    </style:style>
    <style:style style:name="T14" style:family="text">
      <style:text-properties officeooo:rsid="001cb943"/>
    </style:style>
    <style:style style:name="T15" style:family="text">
      <style:text-properties officeooo:rsid="00ff44dd"/>
    </style:style>
    <style:style style:name="T16" style:family="text">
      <style:text-properties officeooo:rsid="00fea96e"/>
    </style:style>
    <style:style style:name="T17" style:family="text">
      <style:text-properties style:text-position="super 58%"/>
    </style:style>
    <style:style style:name="T18" style:family="text">
      <style:text-properties fo:color="#127622" loext:opacity="100%"/>
    </style:style>
    <style:style style:name="T19" style:family="text">
      <style:text-properties style:text-position="33% 80%"/>
    </style:style>
    <style:style style:name="T20" style:family="text">
      <style:text-properties fo:background-color="#fff5ce" loext:char-shading-value="0"/>
    </style:style>
    <style:style style:name="T21" style:family="text">
      <style:text-properties fo:font-style="italic" fo:background-color="#fff5ce" loext:char-shading-value="0"/>
    </style:style>
    <style:style style:name="T22" style:family="text">
      <style:text-properties fo:font-style="italic"/>
    </style:style>
    <style:style style:name="T23" style:family="text">
      <style:text-properties fo:color="#127622" loext:opacity="100%" officeooo:rsid="00219042"/>
    </style:style>
    <style:style style:name="T24" style:family="text">
      <style:text-properties fo:color="#127622" loext:opacity="100%" officeooo:rsid="00234446"/>
    </style:style>
    <style:style style:name="T25" style:family="text">
      <style:text-properties officeooo:rsid="00294bae"/>
    </style:style>
    <style:style style:name="T26" style:family="text">
      <style:text-properties officeooo:rsid="002fc130"/>
    </style:style>
    <style:style style:name="T27" style:family="text">
      <style:text-properties officeooo:rsid="0027cf59"/>
    </style:style>
    <style:style style:name="T28" style:family="text">
      <style:text-properties officeooo:rsid="00302f9b"/>
    </style:style>
    <style:style style:name="T29" style:family="text">
      <style:text-properties officeooo:rsid="003d9e70"/>
    </style:style>
    <style:style style:name="T30" style:family="text">
      <style:text-properties officeooo:rsid="01010cad"/>
    </style:style>
    <style:style style:name="T31" style:family="text">
      <style:text-properties officeooo:rsid="0038e506"/>
    </style:style>
    <style:style style:name="T32" style:family="text">
      <style:text-properties officeooo:rsid="0040b7e1"/>
    </style:style>
    <style:style style:name="T33" style:family="text">
      <style:text-properties officeooo:rsid="00d5d92e"/>
    </style:style>
    <style:style style:name="T34" style:family="text">
      <style:text-properties officeooo:rsid="00318a6f"/>
    </style:style>
    <style:style style:name="T35" style:family="text">
      <style:text-properties officeooo:rsid="0032e337"/>
    </style:style>
    <style:style style:name="T36" style:family="text">
      <style:text-properties officeooo:rsid="0034b5b7"/>
    </style:style>
    <style:style style:name="T37" style:family="text">
      <style:text-properties officeooo:rsid="003771e9"/>
    </style:style>
    <style:style style:name="T38" style:family="text">
      <style:text-properties officeooo:rsid="0034f25b"/>
    </style:style>
    <style:style style:name="T39" style:family="text">
      <style:text-properties officeooo:rsid="003f05a5"/>
    </style:style>
    <style:style style:name="T40" style:family="text">
      <style:text-properties officeooo:rsid="0058f613"/>
    </style:style>
    <style:style style:name="T41" style:family="text">
      <style:text-properties officeooo:rsid="00d7b319"/>
    </style:style>
    <style:style style:name="T42" style:family="text">
      <style:text-properties officeooo:rsid="00d98e90"/>
    </style:style>
    <style:style style:name="T43" style:family="text">
      <style:text-properties officeooo:rsid="004260fc"/>
    </style:style>
    <style:style style:name="T44" style:family="text">
      <style:text-properties officeooo:rsid="00468e57"/>
    </style:style>
    <style:style style:name="T45" style:family="text">
      <style:text-properties officeooo:rsid="00440c6a"/>
    </style:style>
    <style:style style:name="T46" style:family="text">
      <style:text-properties fo:color="#127622" loext:opacity="100%" officeooo:rsid="00440c6a"/>
    </style:style>
    <style:style style:name="T47" style:family="text">
      <style:text-properties officeooo:rsid="004a2ab0"/>
    </style:style>
    <style:style style:name="T48" style:family="text">
      <style:text-properties officeooo:rsid="0047f717"/>
    </style:style>
    <style:style style:name="T49" style:family="text">
      <style:text-properties officeooo:rsid="00da0073"/>
    </style:style>
    <style:style style:name="T50" style:family="text">
      <style:text-properties officeooo:rsid="00da3f4c"/>
    </style:style>
    <style:style style:name="T51" style:family="text">
      <style:text-properties fo:color="#127622" loext:opacity="100%" officeooo:rsid="00da0073"/>
    </style:style>
    <style:style style:name="T52" style:family="text">
      <style:text-properties officeooo:rsid="0047d9ac"/>
    </style:style>
    <style:style style:name="T53" style:family="text">
      <style:text-properties officeooo:rsid="00ddd99a"/>
    </style:style>
    <style:style style:name="T54" style:family="text">
      <style:text-properties officeooo:rsid="00dfcf34"/>
    </style:style>
    <style:style style:name="T55" style:family="text">
      <style:text-properties officeooo:rsid="00e16ff6"/>
    </style:style>
    <style:style style:name="T56" style:family="text">
      <style:text-properties officeooo:rsid="005dc007"/>
    </style:style>
    <style:style style:name="T57" style:family="text">
      <style:text-properties officeooo:rsid="006247b0"/>
    </style:style>
    <style:style style:name="T58" style:family="text">
      <style:text-properties fo:font-weight="bold" style:font-weight-asian="bold" style:font-weight-complex="bold"/>
    </style:style>
    <style:style style:name="T59" style:family="text">
      <style:text-properties style:text-position="super 58%" fo:font-weight="bold" style:font-weight-asian="bold" style:font-weight-complex="bold"/>
    </style:style>
    <style:style style:name="T60" style:family="text">
      <style:text-properties officeooo:rsid="00e45fba"/>
    </style:style>
    <style:style style:name="T61" style:family="text">
      <style:text-properties officeooo:rsid="00e3c28f"/>
    </style:style>
    <style:style style:name="T62" style:family="text">
      <style:text-properties officeooo:rsid="00e4982c"/>
    </style:style>
    <style:style style:name="T63" style:family="text">
      <style:text-properties fo:color="#127622" loext:opacity="100%" officeooo:rsid="005c7306"/>
    </style:style>
    <style:style style:name="T64" style:family="text">
      <style:text-properties officeooo:rsid="005c7306"/>
    </style:style>
    <style:style style:name="T65" style:family="text">
      <style:text-properties fo:font-weight="bold" officeooo:rsid="005c7306" style:font-weight-asian="bold" style:font-weight-complex="bold"/>
    </style:style>
    <style:style style:name="T66" style:family="text">
      <style:text-properties style:text-position="super 58%" fo:font-weight="bold" officeooo:rsid="005c7306" style:font-weight-asian="bold" style:font-weight-complex="bold"/>
    </style:style>
    <style:style style:name="T67" style:family="text">
      <style:text-properties officeooo:rsid="00656075"/>
    </style:style>
    <style:style style:name="T68" style:family="text">
      <style:text-properties officeooo:rsid="006582ba"/>
    </style:style>
    <style:style style:name="T69" style:family="text">
      <style:text-properties fo:color="#127622" loext:opacity="100%" officeooo:rsid="006582ba"/>
    </style:style>
    <style:style style:name="T70" style:family="text">
      <style:text-properties fo:color="#127622" loext:opacity="100%" officeooo:rsid="00659087"/>
    </style:style>
    <style:style style:name="T71" style:family="text">
      <style:text-properties officeooo:rsid="00659087"/>
    </style:style>
    <style:style style:name="T72"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88" style:family="text">
      <style:text-properties fo:background-color="transparent" loext:char-shading-value="0"/>
    </style:style>
    <style:style style:name="T89" style:family="text">
      <style:text-properties style:use-window-font-color="true" loext:opacity="0%" fo:background-color="#fff5ce" loext:char-shading-value="0"/>
    </style:style>
    <style:style style:name="T90" style:family="text">
      <style:text-properties officeooo:rsid="0069b6d5"/>
    </style:style>
    <style:style style:name="T91" style:family="text">
      <style:text-properties fo:color="#800080" loext:opacity="100%" officeooo:rsid="0069b6d5"/>
    </style:style>
    <style:style style:name="T92" style:family="text">
      <style:text-properties fo:font-weight="bold" fo:background-color="#fff5ce" loext:char-shading-value="0" style:font-weight-asian="bold" style:font-weight-complex="bold"/>
    </style:style>
    <style:style style:name="T93" style:family="text">
      <style:text-properties fo:font-style="italic"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006e2693" style:font-style-asian="normal" style:font-style-complex="normal"/>
    </style:style>
    <style:style style:name="T96" style:family="text">
      <style:text-properties officeooo:rsid="00acd4a8"/>
    </style:style>
    <style:style style:name="T97" style:family="text">
      <style:text-properties officeooo:rsid="00a81705"/>
    </style:style>
    <style:style style:name="T98" style:family="text">
      <style:text-properties officeooo:rsid="00e8dfbf"/>
    </style:style>
    <style:style style:name="T99" style:family="text">
      <style:text-properties fo:font-weight="normal" officeooo:rsid="007010d3"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ebe44c" style:font-weight-asian="normal" style:font-weight-complex="normal"/>
    </style:style>
    <style:style style:name="T102" style:family="text">
      <style:text-properties fo:color="#127622" loext:opacity="100%" fo:font-weight="normal" officeooo:rsid="00ebe44c" style:font-weight-asian="normal" style:font-weight-complex="normal"/>
    </style:style>
    <style:style style:name="T103" style:family="text">
      <style:text-properties officeooo:rsid="00a5f8b8"/>
    </style:style>
    <style:style style:name="T104" style:family="text">
      <style:text-properties officeooo:rsid="00712deb"/>
    </style:style>
    <style:style style:name="T105" style:family="text">
      <style:text-properties fo:color="#127622" loext:opacity="100%" officeooo:rsid="00a5f8b8"/>
    </style:style>
    <style:style style:name="T106" style:family="text">
      <style:text-properties officeooo:rsid="00785894"/>
    </style:style>
    <style:style style:name="T107" style:family="text">
      <style:text-properties officeooo:rsid="007fc448"/>
    </style:style>
    <style:style style:name="T108" style:family="text">
      <style:text-properties officeooo:rsid="007d2afd"/>
    </style:style>
    <style:style style:name="T109" style:family="text">
      <style:text-properties officeooo:rsid="00883813"/>
    </style:style>
    <style:style style:name="T110" style:family="text">
      <style:text-properties officeooo:rsid="007ab85f"/>
    </style:style>
    <style:style style:name="T111" style:family="text">
      <style:text-properties fo:font-style="italic" officeooo:rsid="007ab85f" style:font-style-asian="italic" style:font-style-complex="italic"/>
    </style:style>
    <style:style style:name="T112" style:family="text">
      <style:text-properties officeooo:rsid="007e0798"/>
    </style:style>
    <style:style style:name="T113" style:family="text">
      <style:text-properties officeooo:rsid="0089f5f1"/>
    </style:style>
    <style:style style:name="T114" style:family="text">
      <style:text-properties officeooo:rsid="01ee2267"/>
    </style:style>
    <style:style style:name="T115" style:family="text">
      <style:text-properties officeooo:rsid="01ec6da9"/>
    </style:style>
    <style:style style:name="T116" style:family="text">
      <style:text-properties fo:color="#127622" loext:opacity="100%" officeooo:rsid="01ec6da9"/>
    </style:style>
    <style:style style:name="T117" style:family="text">
      <style:text-properties officeooo:rsid="008cfd83"/>
    </style:style>
    <style:style style:name="T118" style:family="text">
      <style:text-properties officeooo:rsid="008dff44"/>
    </style:style>
    <style:style style:name="T119" style:family="text">
      <style:text-properties officeooo:rsid="008b9f27"/>
    </style:style>
    <style:style style:name="T120" style:family="text">
      <style:text-properties officeooo:rsid="00ed2f5b"/>
    </style:style>
    <style:style style:name="T121" style:family="text">
      <style:text-properties officeooo:rsid="00ee4aa4"/>
    </style:style>
    <style:style style:name="T122" style:family="text">
      <style:text-properties style:text-underline-style="solid" style:text-underline-width="auto" style:text-underline-color="font-color" officeooo:rsid="00ee4aa4"/>
    </style:style>
    <style:style style:name="T123" style:family="text">
      <style:text-properties officeooo:rsid="00915d29"/>
    </style:style>
    <style:style style:name="T124" style:family="text">
      <style:text-properties officeooo:rsid="00aee576"/>
    </style:style>
    <style:style style:name="T125" style:family="text">
      <style:text-properties officeooo:rsid="008c993a"/>
    </style:style>
    <style:style style:name="T126" style:family="text">
      <style:text-properties fo:font-style="italic" officeooo:rsid="00915d29" style:font-style-asian="italic" style:font-style-complex="italic"/>
    </style:style>
    <style:style style:name="T127" style:family="text">
      <style:text-properties officeooo:rsid="008cc517"/>
    </style:style>
    <style:style style:name="T128" style:family="text">
      <style:text-properties style:text-position="super 58%" officeooo:rsid="008cc517"/>
    </style:style>
    <style:style style:name="T129" style:family="text">
      <style:text-properties fo:background-color="#ffff00" loext:char-shading-value="0"/>
    </style:style>
    <style:style style:name="T130" style:family="text">
      <style:text-properties officeooo:rsid="00af8a58"/>
    </style:style>
    <style:style style:name="T131" style:family="text">
      <style:text-properties officeooo:rsid="00b1028c"/>
    </style:style>
    <style:style style:name="T132" style:family="text">
      <style:text-properties officeooo:rsid="00b2936c"/>
    </style:style>
    <style:style style:name="T133" style:family="text">
      <style:text-properties officeooo:rsid="00af154a"/>
    </style:style>
    <style:style style:name="T134" style:family="text">
      <style:text-properties officeooo:rsid="00c029da"/>
    </style:style>
    <style:style style:name="T135" style:family="text">
      <style:text-properties officeooo:rsid="00c378f5"/>
    </style:style>
    <style:style style:name="T136" style:family="text">
      <style:text-properties officeooo:rsid="01eec248"/>
    </style:style>
    <style:style style:name="T137" style:family="text">
      <style:text-properties fo:color="#127622" loext:opacity="100%" officeooo:rsid="01eec248"/>
    </style:style>
    <style:style style:name="T138" style:family="text">
      <style:text-properties fo:font-style="normal" fo:font-weight="normal" officeooo:rsid="0096110b" style:font-style-asian="normal" style:font-weight-asian="normal" style:font-style-complex="normal" style:font-weight-complex="normal"/>
    </style:style>
    <style:style style:name="T139" style:family="text">
      <style:text-properties fo:font-style="normal" fo:font-weight="normal" officeooo:rsid="009a2e16" style:font-style-asian="normal" style:font-weight-asian="normal" style:font-style-complex="normal" style:font-weight-complex="normal"/>
    </style:style>
    <style:style style:name="T140" style:family="text">
      <style:text-properties fo:font-style="normal" fo:font-weight="normal" officeooo:rsid="009b6ff7" style:font-style-asian="normal" style:font-weight-asian="normal" style:font-style-complex="normal" style:font-weight-complex="normal"/>
    </style:style>
    <style:style style:name="T141" style:family="text">
      <style:text-properties fo:font-style="normal" fo:font-weight="normal" officeooo:rsid="00b81f21" style:font-style-asian="normal" style:font-weight-asian="normal" style:font-style-complex="normal" style:font-weight-complex="normal"/>
    </style:style>
    <style:style style:name="T142" style:family="text">
      <style:text-properties fo:color="#127622" loext:opacity="100%" fo:font-style="normal" fo:font-weight="normal" officeooo:rsid="00b81f21" style:font-style-asian="normal" style:font-weight-asian="normal" style:font-style-complex="normal" style:font-weight-complex="normal"/>
    </style:style>
    <style:style style:name="T143" style:family="text">
      <style:text-properties officeooo:rsid="0097c454"/>
    </style:style>
    <style:style style:name="T144" style:family="text">
      <style:text-properties officeooo:rsid="00f38bfc"/>
    </style:style>
    <style:style style:name="T145" style:family="text">
      <style:text-properties fo:color="#127622" loext:opacity="100%" officeooo:rsid="0097c454"/>
    </style:style>
    <style:style style:name="T146" style:family="text">
      <style:text-properties fo:font-style="normal" fo:font-weight="normal" officeooo:rsid="01f3679a" style:font-style-asian="normal" style:font-weight-asian="normal" style:font-style-complex="normal" style:font-weight-complex="normal"/>
    </style:style>
    <style:style style:name="T147" style:family="text">
      <style:text-properties fo:font-style="normal" fo:font-weight="normal" officeooo:rsid="01f50ac2" style:font-style-asian="normal" style:font-weight-asian="normal" style:font-style-complex="normal" style:font-weight-complex="normal"/>
    </style:style>
    <style:style style:name="T148" style:family="text">
      <style:text-properties style:text-position="super 58%" fo:font-style="normal" fo:font-weight="normal" officeooo:rsid="01f50ac2" style:font-style-asian="normal" style:font-weight-asian="normal" style:font-style-complex="normal" style:font-weight-complex="normal"/>
    </style:style>
    <style:style style:name="T149" style:family="text">
      <style:text-properties officeooo:rsid="01f50ac2"/>
    </style:style>
    <style:style style:name="T150" style:family="text">
      <style:text-properties officeooo:rsid="01f70fed"/>
    </style:style>
    <style:style style:name="T151" style:family="text">
      <style:text-properties officeooo:rsid="01f573b4"/>
    </style:style>
    <style:style style:name="T152" style:family="text">
      <style:text-properties officeooo:rsid="009fcafa"/>
    </style:style>
    <style:style style:name="T153" style:family="text">
      <style:text-properties officeooo:rsid="00bc921f"/>
    </style:style>
    <style:style style:name="T154" style:family="text">
      <style:text-properties officeooo:rsid="01f055d4"/>
    </style:style>
    <style:style style:name="T155" style:family="text">
      <style:text-properties officeooo:rsid="01fce740"/>
    </style:style>
    <style:style style:name="T156" style:family="text">
      <style:text-properties officeooo:rsid="01ffd4c0"/>
    </style:style>
    <style:style style:name="T157" style:family="text">
      <style:text-properties fo:color="#127622" loext:opacity="100%" officeooo:rsid="01ffd4c0"/>
    </style:style>
    <style:style style:name="T158" style:family="text">
      <style:text-properties officeooo:rsid="01fe2235"/>
    </style:style>
    <style:style style:name="T159" style:family="text">
      <style:text-properties officeooo:rsid="0200fbf3"/>
    </style:style>
    <style:style style:name="T160" style:family="text">
      <style:text-properties officeooo:rsid="01ffa399"/>
    </style:style>
    <style:style style:name="T161" style:family="text">
      <style:text-properties fo:color="#127622" loext:opacity="100%" officeooo:rsid="0200fbf3"/>
    </style:style>
    <style:style style:name="T162" style:family="text">
      <style:text-properties officeooo:rsid="0201a4e6"/>
    </style:style>
    <style:style style:name="T163" style:family="text">
      <style:text-properties officeooo:rsid="02042504"/>
    </style:style>
    <style:style style:name="T164" style:family="text">
      <style:text-properties officeooo:rsid="01f97039"/>
    </style:style>
    <style:style style:name="T165" style:family="text">
      <style:text-properties fo:color="#127622" loext:opacity="100%" officeooo:rsid="01f97039"/>
    </style:style>
    <style:style style:name="T166" style:family="text">
      <style:text-properties fo:color="#127622" loext:opacity="100%" officeooo:rsid="01ffa399"/>
    </style:style>
    <style:style style:name="T167" style:family="text">
      <style:text-properties officeooo:rsid="020609ce"/>
    </style:style>
    <style:style style:name="T168" style:family="text">
      <style:text-properties officeooo:rsid="0206bc0f"/>
    </style:style>
    <style:style style:name="T169" style:family="text">
      <style:text-properties officeooo:rsid="01fab93e"/>
    </style:style>
    <style:style style:name="T170" style:family="text">
      <style:text-properties officeooo:rsid="020831c0"/>
    </style:style>
    <style:style style:name="T171" style:family="text">
      <style:text-properties style:font-name="Gabriela Nerd Font" fo:font-size="12pt" style:font-size-asian="12pt" style:font-size-complex="12pt"/>
    </style:style>
    <style:style style:name="T172" style:family="text">
      <style:text-properties style:font-name="Gabriela Nerd Font" fo:font-size="12pt" officeooo:rsid="0108550d" style:font-size-asian="12pt" style:font-size-complex="12pt"/>
    </style:style>
    <style:style style:name="T173" style:family="text">
      <style:text-properties officeooo:rsid="01130981"/>
    </style:style>
    <style:style style:name="T174" style:family="text">
      <style:text-properties style:text-position="super 58%" officeooo:rsid="01130981"/>
    </style:style>
    <style:style style:name="T175" style:family="text">
      <style:text-properties fo:background-color="#ffffd7" loext:char-shading-value="0"/>
    </style:style>
    <style:style style:name="T176" style:family="text">
      <style:text-properties officeooo:rsid="0114a5c3"/>
    </style:style>
    <style:style style:name="T177" style:family="text">
      <style:text-properties style:text-position="super 58%" officeooo:rsid="0114a5c3"/>
    </style:style>
    <style:style style:name="T178" style:family="text">
      <style:text-properties officeooo:rsid="01d4830f"/>
    </style:style>
    <style:style style:name="T179" style:family="text">
      <style:text-properties officeooo:rsid="010b86ca"/>
    </style:style>
    <style:style style:name="T180" style:family="text">
      <style:text-properties officeooo:rsid="010d2670"/>
    </style:style>
    <style:style style:name="T181" style:family="text">
      <style:text-properties officeooo:rsid="01323b5c"/>
    </style:style>
    <style:style style:name="T182" style:family="text">
      <style:text-properties officeooo:rsid="0134de92"/>
    </style:style>
    <style:style style:name="T183" style:family="text">
      <style:text-properties officeooo:rsid="01336a5f"/>
    </style:style>
    <style:style style:name="T184" style:family="text">
      <style:text-properties officeooo:rsid="012019a3"/>
    </style:style>
    <style:style style:name="T185" style:family="text">
      <style:text-properties officeooo:rsid="018a5bbd"/>
    </style:style>
    <style:style style:name="T186" style:family="text">
      <style:text-properties officeooo:rsid="012685d6"/>
    </style:style>
    <style:style style:name="T187" style:family="text">
      <style:text-properties officeooo:rsid="0152e713"/>
    </style:style>
    <style:style style:name="T188" style:family="text">
      <style:text-properties officeooo:rsid="01541cbc"/>
    </style:style>
    <style:style style:name="T189" style:family="text">
      <style:text-properties officeooo:rsid="01d65b5f"/>
    </style:style>
    <style:style style:name="T190" style:family="text">
      <style:text-properties officeooo:rsid="01287a13"/>
    </style:style>
    <style:style style:name="T191" style:family="text">
      <style:text-properties officeooo:rsid="011db25f"/>
    </style:style>
    <style:style style:name="T192" style:family="text">
      <style:text-properties officeooo:rsid="011e4e54"/>
    </style:style>
    <style:style style:name="T193" style:family="text">
      <style:text-properties officeooo:rsid="0154f074"/>
    </style:style>
    <style:style style:name="T194" style:family="text">
      <style:text-properties officeooo:rsid="0116e607"/>
    </style:style>
    <style:style style:name="T195" style:family="text">
      <style:text-properties officeooo:rsid="015c7add"/>
    </style:style>
    <style:style style:name="T196" style:family="text">
      <style:text-properties officeooo:rsid="011f1a79"/>
    </style:style>
    <style:style style:name="T197" style:family="text">
      <style:text-properties officeooo:rsid="01176648"/>
    </style:style>
    <style:style style:name="T198" style:family="text">
      <style:text-properties officeooo:rsid="0155c5f6"/>
    </style:style>
    <style:style style:name="T199" style:family="text">
      <style:text-properties officeooo:rsid="012afd5e"/>
    </style:style>
    <style:style style:name="T200" style:family="text">
      <style:text-properties officeooo:rsid="011f963a"/>
    </style:style>
    <style:style style:name="T201" style:family="text">
      <style:text-properties officeooo:rsid="0158a898"/>
    </style:style>
    <style:style style:name="T202" style:family="text">
      <style:text-properties officeooo:rsid="012b4864"/>
    </style:style>
    <style:style style:name="T203" style:family="text">
      <style:text-properties officeooo:rsid="0159001f"/>
    </style:style>
    <style:style style:name="T204" style:family="text">
      <style:text-properties officeooo:rsid="012bf3db"/>
    </style:style>
    <style:style style:name="T205" style:family="text">
      <style:text-properties fo:color="#127622" loext:opacity="100%" officeooo:rsid="011f963a"/>
    </style:style>
    <style:style style:name="T206" style:family="text">
      <style:text-properties officeooo:rsid="01d9fdc4"/>
    </style:style>
    <style:style style:name="T207" style:family="text">
      <style:text-properties officeooo:rsid="01d79079"/>
    </style:style>
    <style:style style:name="T208" style:family="text">
      <style:text-properties officeooo:rsid="01d82b1f"/>
    </style:style>
    <style:style style:name="T209" style:family="text">
      <style:text-properties officeooo:rsid="01da99b5"/>
    </style:style>
    <style:style style:name="T210" style:family="text">
      <style:text-properties fo:font-style="italic" officeooo:rsid="01da99b5" style:font-style-asian="italic" style:font-style-complex="italic"/>
    </style:style>
    <style:style style:name="T211" style:family="text">
      <style:text-properties officeooo:rsid="014626f7"/>
    </style:style>
    <style:style style:name="T212" style:family="text">
      <style:text-properties officeooo:rsid="01dae965"/>
    </style:style>
    <style:style style:name="T213" style:family="text">
      <style:text-properties fo:color="#127622" loext:opacity="100%" officeooo:rsid="014626f7"/>
    </style:style>
    <style:style style:name="T214" style:family="text">
      <style:text-properties officeooo:rsid="014657dc"/>
    </style:style>
    <style:style style:name="T215" style:family="text">
      <style:text-properties officeooo:rsid="016f50f5"/>
    </style:style>
    <style:style style:name="T216"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17" style:family="text">
      <style:text-properties fo:font-variant="normal" fo:text-transform="none" fo:color="#000000" loext:opacity="10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18"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19"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20"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22"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23"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4" style:family="text">
      <style:text-properties fo:font-variant="normal" fo:text-transform="none" fo:color="#000000" loext:opacity="100%" style:text-outline="false" style:text-line-through-style="none" style:text-line-through-type="none" fo:font-family="'Liberation Sans'" style:font-family-generic="roman"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5" style:family="text">
      <style:text-properties fo:font-variant="normal" fo:text-transform="none" fo:color="#000000" loext:opacity="100%" style:text-outline="false" style:text-line-through-style="none" style:text-line-through-type="none" fo:font-family="Ubuntu" style:font-style-name="Regular" style:font-family-generic="swiss"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6" style:family="text">
      <style:text-properties fo:font-variant="normal" fo:text-transform="none" fo:color="#000000" loext:opacity="100%" style:text-outline="false" style:text-line-through-style="none" style:text-line-through-type="none" style:text-position="super 58%" fo:font-family="Ubuntu" style:font-style-name="Regular" style:font-family-generic="swiss"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fo:background-color="#ffdbb6"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0"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fo:background-color="#ffdbb6"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1"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2"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3"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4"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5"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36"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237"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8"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9"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40"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41" style:family="text">
      <style:text-properties officeooo:rsid="01ddb082"/>
    </style:style>
    <style:style style:name="T242" style:family="text">
      <style:text-properties officeooo:rsid="01b2fdcb"/>
    </style:style>
    <style:style style:name="T243" style:family="text">
      <style:text-properties officeooo:rsid="016aa814"/>
    </style:style>
    <style:style style:name="T244" style:family="text">
      <style:text-properties officeooo:rsid="01609bdf"/>
    </style:style>
    <style:style style:name="T245" style:family="text">
      <style:text-properties officeooo:rsid="0162c4fa"/>
    </style:style>
    <style:style style:name="T246" style:family="text">
      <style:text-properties officeooo:rsid="0161278d"/>
    </style:style>
    <style:style style:name="T247" style:family="text">
      <style:text-properties officeooo:rsid="019e01a3"/>
    </style:style>
    <style:style style:name="T248" style:family="text">
      <style:text-properties officeooo:rsid="0164785f"/>
    </style:style>
    <style:style style:name="T249" style:family="text">
      <style:text-properties officeooo:rsid="01e0396d"/>
    </style:style>
    <style:style style:name="T250" style:family="text">
      <style:text-properties officeooo:rsid="01b43700"/>
    </style:style>
    <style:style style:name="T251" style:family="text">
      <style:text-properties officeooo:rsid="01b593d5"/>
    </style:style>
    <style:style style:name="T252" style:family="text">
      <style:text-properties fo:color="#127622" loext:opacity="100%" officeooo:rsid="01b593d5"/>
    </style:style>
    <style:style style:name="T253" style:family="text">
      <style:text-properties officeooo:rsid="01b722e1"/>
    </style:style>
    <style:style style:name="T254" style:family="text">
      <style:text-properties officeooo:rsid="016db69d"/>
    </style:style>
    <style:style style:name="T255" style:family="text">
      <style:text-properties officeooo:rsid="01e1fe57"/>
    </style:style>
    <style:style style:name="T256" style:family="text">
      <style:text-properties officeooo:rsid="01e2d889"/>
    </style:style>
    <style:style style:name="T257" style:family="text">
      <style:text-properties officeooo:rsid="017be587"/>
    </style:style>
    <style:style style:name="T258" style:family="text">
      <style:text-properties officeooo:rsid="016df4fd"/>
    </style:style>
    <style:style style:name="T259" style:family="text">
      <style:text-properties officeooo:rsid="01c374f5"/>
    </style:style>
    <style:style style:name="T260" style:family="text">
      <style:text-properties officeooo:rsid="01c4c137"/>
    </style:style>
    <style:style style:name="T261" style:family="text">
      <style:text-properties officeooo:rsid="01bd5c38"/>
    </style:style>
    <style:style style:name="T262" style:family="text">
      <style:text-properties fo:background-color="#ffbf00" loext:char-shading-value="0"/>
    </style:style>
    <style:style style:name="T263" style:family="text">
      <style:text-properties officeooo:rsid="01a10973"/>
    </style:style>
    <style:style style:name="T264" style:family="text">
      <style:text-properties officeooo:rsid="01b95d55"/>
    </style:style>
    <style:style style:name="T265" style:family="text">
      <style:text-properties officeooo:rsid="017ac055"/>
    </style:style>
    <style:style style:name="T266" style:family="text">
      <style:text-properties officeooo:rsid="01802097"/>
    </style:style>
    <style:style style:name="T267" style:family="text">
      <style:text-properties officeooo:rsid="01bb9536"/>
    </style:style>
    <style:style style:name="T268" style:family="text">
      <style:text-properties fo:font-style="italic" fo:background-color="#ffffd7" loext:char-shading-value="0"/>
    </style:style>
    <style:style style:name="T269" style:family="text">
      <style:text-properties officeooo:rsid="01a3cf58"/>
    </style:style>
    <style:style style:name="T270" style:family="text">
      <style:text-properties officeooo:rsid="018c3801"/>
    </style:style>
    <style:style style:name="T271" style:family="text">
      <style:text-properties fo:color="#127622" loext:opacity="100%" officeooo:rsid="018c3801"/>
    </style:style>
    <style:style style:name="T272" style:family="text">
      <style:text-properties officeooo:rsid="018efbf6"/>
    </style:style>
    <style:style style:name="T273" style:family="text">
      <style:text-properties style:text-position="super 58%" officeooo:rsid="018efbf6"/>
    </style:style>
    <style:style style:name="T274" style:family="text">
      <style:text-properties officeooo:rsid="01e516fb"/>
    </style:style>
    <style:style style:name="T275" style:family="text">
      <style:text-properties officeooo:rsid="01a6e8b3"/>
    </style:style>
    <style:style style:name="T276" style:family="text">
      <style:text-properties officeooo:rsid="01a559ba"/>
    </style:style>
    <style:style style:name="T277" style:family="text">
      <style:text-properties officeooo:rsid="01bdf420"/>
    </style:style>
    <style:style style:name="T278" style:family="text">
      <style:text-properties officeooo:rsid="018f8368"/>
    </style:style>
    <style:style style:name="T279" style:family="text">
      <style:text-properties officeooo:rsid="01be2890"/>
    </style:style>
    <style:style style:name="T280" style:family="text">
      <style:text-properties officeooo:rsid="01c8fcbf"/>
    </style:style>
    <style:style style:name="T281" style:family="text">
      <style:text-properties officeooo:rsid="01ab8879"/>
    </style:style>
    <style:style style:name="T282" style:family="text">
      <style:text-properties fo:color="#127622" loext:opacity="100%" officeooo:rsid="01abafba"/>
    </style:style>
    <style:style style:name="T283" style:family="text">
      <style:text-properties officeooo:rsid="01abafba"/>
    </style:style>
    <style:style style:name="T284" style:family="text">
      <style:text-properties officeooo:rsid="01ad3cdd"/>
    </style:style>
    <style:style style:name="T285" style:family="text">
      <style:text-properties officeooo:rsid="01af1dce"/>
    </style:style>
    <style:style style:name="T286" style:family="text">
      <style:text-properties officeooo:rsid="01ca0e8f"/>
    </style:style>
    <style:style style:name="T287" style:family="text">
      <style:text-properties officeooo:rsid="01a7aea9"/>
    </style:style>
    <style:style style:name="T288" style:family="text">
      <style:text-properties style:font-name="Liberation Sans" officeooo:rsid="01a7aea9" style:font-name-complex="Liberation Sans"/>
    </style:style>
    <style:style style:name="T289" style:family="text">
      <style:text-properties style:font-name="Liberation Sans" officeooo:rsid="01a6e8b3" style:font-name-complex="Liberation Sans"/>
    </style:style>
    <style:style style:name="T290" style:family="text">
      <style:text-properties style:font-name="Liberation Sans" officeooo:rsid="01ab8879" style:font-name-complex="Liberation Sans"/>
    </style:style>
    <style:style style:name="T291" style:family="text">
      <style:text-properties officeooo:rsid="01af5420"/>
    </style:style>
    <style:style style:name="T292" style:family="text">
      <style:text-properties officeooo:rsid="01af5420" fo:background-color="#ffff00" loext:char-shading-value="0"/>
    </style:style>
    <style:style style:name="T293" style:family="text">
      <style:text-properties fo:font-weight="normal" officeooo:rsid="01cd5005" style:font-weight-asian="normal" style:font-weight-complex="normal"/>
    </style:style>
    <style:style style:name="T294" style:family="text">
      <style:text-properties fo:font-weight="normal" officeooo:rsid="01cf151e" style:font-weight-asian="normal" style:font-weight-complex="normal"/>
    </style:style>
    <style:style style:name="T295" style:family="text">
      <style:text-properties fo:font-weight="normal" officeooo:rsid="01d04f83" style:font-weight-asian="normal" style:font-weight-complex="normal"/>
    </style:style>
    <style:style style:name="T296" style:family="text">
      <style:text-properties officeooo:rsid="01d04f83"/>
    </style:style>
    <style:style style:name="T297" style:family="text">
      <style:text-properties officeooo:rsid="01e71553"/>
    </style:style>
    <style:style style:name="T298" style:family="text">
      <style:text-properties officeooo:rsid="01d1d2e3"/>
    </style:style>
    <style:style style:name="T299" style:family="text">
      <style:text-properties officeooo:rsid="019817cc"/>
    </style:style>
    <style:style style:name="T300" style:family="text">
      <style:text-properties officeooo:rsid="019ad2a2"/>
    </style:style>
    <style:style style:name="T301" style:family="text">
      <style:text-properties officeooo:rsid="019c4c2c"/>
    </style:style>
    <style:style style:name="T302" style:family="text">
      <style:text-properties fo:font-weight="normal" officeooo:rsid="01e85d18" style:font-weight-asian="normal" style:font-weight-complex="normal"/>
    </style:style>
    <style:style style:name="T303" style:family="text">
      <style:text-properties fo:font-weight="normal" officeooo:rsid="0190e3f9" style:font-weight-asian="normal" style:font-weight-complex="normal"/>
    </style:style>
    <style:style style:name="T304" style:family="text">
      <style:text-properties fo:font-weight="normal" officeooo:rsid="01d298a1" style:font-weight-asian="normal" style:font-weight-complex="normal"/>
    </style:style>
    <style:style style:name="T305" style:family="text">
      <style:text-properties fo:font-weight="normal" officeooo:rsid="019de953" style:font-weight-asian="normal" style:font-weight-complex="normal"/>
    </style:style>
    <style:style style:name="T306" style:family="text">
      <style:text-properties fo:font-weight="normal" officeooo:rsid="01933e06" style:font-weight-asian="normal" style:font-weight-complex="normal"/>
    </style:style>
    <style:style style:name="T307" style:family="text">
      <style:text-properties fo:font-weight="normal" officeooo:rsid="01949474" style:font-weight-asian="normal" style:font-weight-complex="normal"/>
    </style:style>
    <style:style style:name="T308" style:family="text">
      <style:text-properties fo:font-weight="normal" officeooo:rsid="01d390db" style:font-weight-asian="normal" style:font-weight-complex="normal"/>
    </style:style>
    <style:style style:name="T309" style:family="text">
      <style:text-properties fo:font-weight="normal" officeooo:rsid="0196a9e6" style:font-weight-asian="normal" style:font-weight-complex="normal"/>
    </style:style>
    <style:style style:name="T310" style:family="text">
      <style:text-properties fo:font-weight="normal" officeooo:rsid="01902fea" style:font-weight-asian="normal" style:font-weight-complex="normal"/>
    </style:style>
    <style:style style:name="T311" style:family="text">
      <style:text-properties fo:color="#127622" loext:opacity="100%" fo:font-weight="normal" officeooo:rsid="0190e3f9" style:font-weight-asian="normal" style:font-weight-complex="normal"/>
    </style:style>
    <style:style style:name="T312" style:family="text">
      <style:text-properties officeooo:rsid="01e9322d"/>
    </style:style>
    <style:style style:name="T313" style:family="text">
      <style:text-properties officeooo:rsid="01e95b08"/>
    </style:style>
    <style:style style:name="T314" style:family="text">
      <style:text-properties officeooo:rsid="01eb6a50"/>
    </style:style>
    <style:style style:name="T315" style:family="text">
      <style:text-properties style:text-position="super 58%" officeooo:rsid="01eb6a5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1.3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8043in" fo:min-width="1.005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bottom"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8"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1.7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1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1" style:family="graphic">
      <style:graphic-properties draw:stroke="dash" draw:stroke-dash="Dot" svg:stroke-width="0in" svg:stroke-color="#000000" draw:marker-start="Concave_20_short" draw:marker-start-width="0.0783in" draw:marker-start-center="false" draw:marker-end="" draw:marker-end-width="0.0783in" draw:marker-end-center="false"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top" draw:auto-grow-height="false" fo:min-height="1.3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6" style:family="graphic">
      <style:graphic-properties draw:stroke="dash" draw:stroke-dash="Dot" svg:stroke-width="0in" svg:stroke-color="#000000" draw:marker-start="Concave_20_short" draw:marker-start-width="0.0783in" draw:marker-start-center="false" draw:marker-end=""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7" style:family="graphic">
      <style:graphic-properties draw:stroke="dash" draw:stroke-dash="Dot" svg:stroke-width="0in" svg:stroke-color="#000000" draw:marker-start="" draw:marker-start-width="0.1181in" draw:marker-start-center="false" draw:marker-end="" draw:marker-end-width="0.1181in" draw:marker-end-center="false" svg:stroke-linecap="butt"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8"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4.9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2.6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7138in" fo:min-width="1.01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1"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2" style:family="graphic">
      <style:graphic-properties draw:stroke="dash" draw:stroke-dash="Dash" svg:stroke-width="0in" svg:stroke-color="#000000" draw:marker-start="" draw:marker-start-width="0.0783in" draw:marker-start-center="false" draw:marker-end="" draw:marker-end-width="0.0783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4"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ec9ba4" draw:textarea-horizontal-align="justify" draw:textarea-vertical-align="middle" draw:auto-grow-height="false" fo:min-height="0.4429in" fo:min-width="1.044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0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7"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8"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9846in" fo:min-width="0.9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9"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1.4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0"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1"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12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2"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justify" draw:textarea-vertical-align="middle" draw:auto-grow-height="false" fo:min-height="0.3492in" fo:min-width="0.957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3"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justify"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4" style:family="graphic">
      <style:graphic-properties draw:stroke="dash" draw:stroke-dash="Dot" svg:stroke-width="0in" svg:stroke-color="#000000" draw:marker-start="Concave_20_short" draw:marker-start-width="0.1181in" draw:marker-start-center="false" draw:marker-end="Concave_20_short"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ec9ba4" draw:textarea-horizontal-align="justify" draw:textarea-vertical-align="middle" draw:auto-grow-height="false" fo:min-height="0.4429in" fo:min-width="0.88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6"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left"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7" style:family="graphic">
      <style:graphic-properties draw:stroke="solid" draw:stroke-dash="Dash_20_Dot_20_4" svg:stroke-width="0in" svg:stroke-color="#729fcf"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 style:family="graphic">
      <style:graphic-properties draw:stroke="solid" svg:stroke-width="0in" svg:stroke-color="#729fcf"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1.9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1"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3.7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2"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5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129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4"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3.8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1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323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7"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2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8"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top" draw:auto-grow-height="false" fo:min-height="0.6236in" fo:min-width="1.0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9"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03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1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1" style:family="graphic">
      <style:graphic-properties draw:stroke="solid" svg:stroke-width="0in" svg:stroke-color="#ff0000" draw:marker-start="" draw:marker-start-width="0.0783in" draw:marker-start-center="false" draw:marker-end="Arrowheads_20_13" draw:marker-end-width="0.1181in" draw:marker-end-center="false" svg:stroke-opacity="5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3" style:family="graphic">
      <style:graphic-properties draw:stroke="solid" draw:stroke-dash="Dash_20_Dot_20_4" svg:stroke-width="0in" svg:stroke-color="#ff0000" draw:marker-start="" draw:marker-start-width="0.0783in" draw:marker-start-center="false" draw:marker-end="Arrowheads_20_13" draw:marker-end-width="0.1181in" draw:marker-end-center="false" svg:stroke-opacity="5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9846in" fo:min-width="0.9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87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6" style:family="graphic">
      <style:graphic-properties draw:stroke="solid" svg:stroke-width="0in" svg:stroke-color="#2a6099"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 style:family="graphic">
      <style:graphic-properties draw:stroke="dash" draw:stroke-dash="Dot" svg:stroke-width="0in" svg:stroke-color="#000000" draw:marker-start="" draw:marker-start-width="0.1181in" draw:marker-start-center="false" draw:marker-end=""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8" style:family="graphic">
      <style:graphic-properties draw:stroke="solid" svg:stroke-width="0in" svg:stroke-color="#800080" draw:marker-start="" draw:marker-start-width="0.0783in" draw:marker-start-center="false" draw:marker-end="Arrowheads_20_13" draw:marker-end-width="0.1181in" draw:marker-end-center="false" svg:stroke-opacity="10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 style:family="graphic">
      <style:graphic-properties draw:stroke="dash" draw:stroke-dash="Dot" svg:stroke-width="0in" svg:stroke-color="#000000" draw:marker-start="Concave_20_short" draw:marker-start-width="0.1181in" draw:marker-start-center="false" draw:marker-end="" draw:marker-end-width="0.0783in" draw:marker-end-center="false" draw:fill="solid"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6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top" draw:auto-grow-height="false" fo:min-height="0.8945in" fo:min-width="0.9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1" style:family="graphic">
      <style:graphic-properties draw:stroke="solid" draw:stroke-dash="Dot"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2.2102in" fo:min-width="1.0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2" style:family="graphic">
      <style:graphic-properties draw:stroke="dash" draw:stroke-dash="Dot" svg:stroke-width="0in" svg:stroke-color="#000000" draw:marker-start="Concave_20_short" draw:marker-start-width="0.0783in" draw:marker-start-center="false" draw:marker-end="Concave_20_short"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63"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center"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4" style:family="graphic">
      <style:graphic-properties draw:stroke="dash" draw:stroke-dash="Dash" svg:stroke-width="0.0071in" svg:stroke-color="#bf0041" draw:marker-start="Concave_20_short" draw:marker-start-width="0.1283in" draw:marker-start-center="false" draw:marker-end="" draw:marker-end-width="0.0898in" draw:marker-end-center="false" svg:stroke-linecap="butt" draw:fill="solid" draw:fill-color="#729fcf" draw:textarea-horizontal-align="lef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5" style:family="graphic">
      <style:graphic-properties draw:stroke="dash" draw:stroke-dash="Dash" svg:stroke-width="0.0071in" svg:stroke-color="#bf0041" draw:marker-start="Concave_20_short" draw:marker-start-width="0.0898in" draw:marker-start-center="false" draw:marker-end="" draw:marker-end-width="0.0898in" draw:marker-end-center="false" svg:stroke-linecap="butt" draw:fill="none" draw:fill-color="#729fcf" draw:textarea-horizontal-align="righ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2.28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7" style:family="graphic">
      <style:graphic-properties draw:stroke="solid" draw:stroke-dash="Dot" svg:stroke-width="0in" svg:stroke-color="#ff0000" draw:marker-start="" draw:marker-start-width="0.0783in" draw:marker-start-center="false" draw:marker-end="" draw:marker-end-width="0.0783in" draw:marker-end-center="false" draw:fill="solid" draw:fill-color="#fff5ce" draw:textarea-horizontal-align="left" draw:textarea-vertical-align="middl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8" style:family="graphic">
      <style:graphic-properties draw:stroke="dash" draw:stroke-dash="Dash" svg:stroke-width="0.0071in" svg:stroke-color="#bf0041" draw:marker-start="Concave_20_short" draw:marker-start-width="0.0898in" draw:marker-start-center="false" draw:marker-end="Concave_20_short" draw:marker-end-width="0.0898in" draw:marker-end-center="false" svg:stroke-linecap="butt" draw:fill="none" draw:fill-color="#729fcf" draw:textarea-horizontal-align="righ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9"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left" draw:textarea-vertical-align="middle" draw:auto-grow-height="true" fo:min-height="0in" fo:min-width="0in" fo:padding-top="0.0492in" fo:padding-bottom="0.0492in" fo:padding-left="0.05in" fo:padding-right="0.05in" fo:wrap-option="wrap" draw:shadow="hidden" draw:shadow-offset-x="0.0783in" draw:shadow-offset-y="0.0783in" draw:shadow-color="#808080" style:writing-mode="lr-tb" loext:decorative="false" style:run-through="foreground"/>
      <style:paragraph-properties style:writing-mode="lr-tb"/>
    </style:style>
    <style:style style:name="gr7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5983b0" draw:textarea-horizontal-align="justify" draw:textarea-vertical-align="middle" draw:auto-grow-height="false" fo:min-height="0in" fo:min-width="1.040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1" style:family="graphic">
      <style:graphic-properties draw:stroke="dash" draw:stroke-dash="Dot" svg:stroke-width="0in" svg:stroke-color="#000000" draw:marker-start="Arrowheads_20_14"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72" style:family="graphic">
      <style:graphic-properties draw:stroke="dash" draw:stroke-dash="Dot" svg:stroke-width="0in" svg:stroke-color="#000000" draw:marker-start="Concave_20_short"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7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5983b0" draw:textarea-horizontal-align="justify" draw:textarea-vertical-align="middle" draw:auto-grow-height="false" fo:min-height="0in" fo:min-width="0.6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4" style:family="graphic">
      <style:graphic-properties draw:stroke="dash" draw:stroke-dash="Dot" svg:stroke-width="0in" svg:stroke-color="#729fcf" draw:marker-start="" draw:marker-start-width="0.0783in" draw:marker-start-center="false" draw:marker-end="Arrowheads_20_8" draw:marker-end-width="0.1181in" draw:marker-end-center="false" svg:stroke-opacity="10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azing facts about the kings of Israel &amp; Judah that you probably didn’t notice</text:p>
      <text:p text:style-name="P2">Matthew 10:34</text:p>
      <text:p text:style-name="P3"/>
      <text:p text:style-name="P3"/>
      <text:p text:style-name="P4">Let’s start with one that is <text:span text:style-name="T1">relatively </text:span>simple to understand but easy to miss.<text:span text:style-name="T2"> </text:span><text:span text:style-name="T3">I</text:span><text:span text:style-name="T2">t requires putting together several details from </text:span><text:span text:style-name="T4">2Ki 15</text:span><text:span text:style-name="T2"> &amp; </text:span><text:span text:style-name="T4">18</text:span>. <text:span text:style-name="T5">The following chart is an excerpt from a larger chart </text:span><text:span text:style-name="T6">that is </text:span><text:span text:style-name="T5">drawn to scale such that 1 year = 0.1 inches.</text:span></text:p>
      <text:p text:style-name="P4"/>
      <text:p text:style-name="P4"/>
      <text:p text:style-name="P4"><draw:g text:anchor-type="paragraph" draw:z-index="0" draw:name="Group object 1" draw:style-name="gr1"><draw:line draw:style-name="gr2" draw:text-style-name="P6" svg:x1="1.8138in" svg:y1="3.9055in" svg:x2="3.6701in" svg:y2="3.9055in"><text:p text:style-name="P5"><text:span text:style-name="T7"/></text:p><text:p text:style-name="P5"><text:span text:style-name="T7">39th year <text:s text:c="4"/></text:span></text:p><text:p text:style-name="P5"><text:span text:style-name="T7">2Ki 15:13,17 <text:s text:c="4"/></text:span></text:p></draw:line><draw:line draw:style-name="gr3" draw:text-style-name="P6" svg:x1="4.6846in" svg:y1="0.0008in" svg:x2="5.3646in" svg:y2="0.0008in"><text:p text:style-name="P5"><text:span text:style-name="T7"/></text:p><text:p text:style-name="P5"><text:span text:style-name="T7">Age: 16</text:span></text:p></draw:line><draw:line draw:style-name="gr4" draw:text-style-name="P6" svg:x1="3.215in" svg:y1="7.0055in" svg:x2="3.935in" svg:y2="7.0055in"><text:p text:style-name="P5"><text:span text:style-name="T7"/></text:p><text:p text:style-name="P5"><text:span text:style-name="T7">Age: 41</text:span></text:p></draw:line><draw:line draw:style-name="gr4" draw:text-style-name="P6" svg:x1="3.8657in" svg:y1="8.5055in" svg:x2="4.4756in" svg:y2="8.5055in"><text:p text:style-name="P5"><text:span text:style-name="T7"/></text:p><text:p text:style-name="P5"><text:span text:style-name="T7">Age: 36</text:span></text:p></draw:line><draw:custom-shape draw:style-name="gr5" draw:text-style-name="P8" svg:width="1.3004in" svg:height="1.6004in" svg:x="3.6724in" svg:y="5.4051in"><text:p text:style-name="P7"><text:span text:style-name="T8">Jotham/Joatham</text:span></text:p><text:p text:style-name="P7"><text:span text:style-name="T8">16yrs</text:span></text:p><text:p text:style-name="P7"><text:span text:style-name="T8">2Ki 15:5,32,33</text:span></text:p><text:p text:style-name="P7"><text:span text:style-name="T8">2Ch 26:23, 27:1,8</text:span></text:p><text:p text:style-name="P7"><text:span text:style-name="T8">Mat 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8" svg:width="1.3004in" svg:height="1.0004in" svg:x="0.7563in" svg:y="3.9051in"><text:p text:style-name="P7"><text:span text:style-name="T8">Menahem</text:span></text:p><text:p text:style-name="P7"><text:span text:style-name="T8">son of Gadi</text:span></text:p><text:p text:style-name="P7"><text:span text:style-name="T8">10yrs</text:span></text:p><text:p text:style-name="P7"><text:span text:style-name="T8">2Ki 15: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7" draw:text-style-name="P6" svg:x1="1.0992in" svg:y1="5.0087in" svg:x2="3.6709in" svg:y2="5.0087in"><text:p text:style-name="P5"><text:span text:style-name="T7">50th year <text:s text:c="4"/></text:span></text:p><text:p text:style-name="P5"><text:span text:style-name="T7">2Ki 15:23 <text:s text:c="4"/></text:span></text:p><text:p text:style-name="P5"><text:span text:style-name="T7"/></text:p></draw:line><draw:custom-shape draw:style-name="gr8" draw:text-style-name="P8" svg:width="1.3004in" svg:height="2.0004in" svg:x="0.7563in" svg:y="5.2051in"><text:p text:style-name="P7"><text:span text:style-name="T8">Pekah</text:span></text:p><text:p text:style-name="P7"><text:span text:style-name="T8">son of Remaliah</text:span></text:p><text:p text:style-name="P7"><text:span text:style-name="T8">20yrs</text:span></text:p><text:p text:style-name="P7"><text:span text:style-name="T8">2Ki 15:25,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10" svg:width="1.413in" svg:height="0.2004in" svg:x="0.6445in" svg:y="5.0051in"><text:p text:style-name="P9"><text:span text:style-name="T9">Pekahiah 2yrs 2Ki 15: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6" svg:x1="1.0992in" svg:y1="7.4067in" svg:x2="3.6709in" svg:y2="7.4067in"><text:p text:style-name="P5"><text:span text:style-name="T7">20th year of Jotham (age: 45) <text:s text:c="4"/></text:span></text:p><text:p text:style-name="P5"><text:span text:style-name="T7">2Ki 15:30 <text:s text:c="4"/></text:span></text:p></draw:line><draw:line draw:style-name="gr11" draw:text-style-name="P12" svg:x1="2.0567in" svg:y1="5.4055in" svg:x2="3.9417in" svg:y2="5.4055in"><text:p text:style-name="P11"><text:span text:style-name="T7"><text:s text:c="3"/></text:span></text:p><text:p text:style-name="P11"><text:span text:style-name="T7"><text:s text:c="3"/></text:span></text:p><text:p text:style-name="P11"><text:span text:style-name="T7"><text:s text:c="6"/>2nd year 2Ki 15:32</text:span></text:p></draw:line><draw:line draw:style-name="gr12" draw:text-style-name="P6" svg:x1="4.6831in" svg:y1="5.4055in" svg:x2="5.3031in" svg:y2="5.4055in"><text:p text:style-name="P5"><text:span text:style-name="T7"/></text:p><text:p text:style-name="P5"><text:span text:style-name="T7">Age: 25</text:span></text:p></draw:line><draw:custom-shape draw:style-name="gr13" draw:text-style-name="P8" svg:width="1.3004in" svg:height="1.6004in" svg:x="4.2634in" svg:y="6.9051in"><draw:glue-point draw:id="4" svg:x="1.9685in" svg:y="-0.9016in"/><text:p text:style-name="P7"><text:span text:style-name="T8">Ahaz/Achaz</text:span></text:p><text:p text:style-name="P7"><text:span text:style-name="T8">16yrs</text:span></text:p><text:p text:style-name="P7"><text:span text:style-name="T8">2Ki 16:2</text:span></text:p><text:p text:style-name="P7"><text:span text:style-name="T8">2Ch 27:9, 28:1 Mat 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4" draw:text-style-name="P13" svg:x1="3.6728in" svg:y1="7.4055in" svg:x2="3.6728in" svg:y2="5.4055in"><text:p/></draw:line><draw:line draw:style-name="gr11" draw:text-style-name="P12" svg:x1="2.0571in" svg:y1="6.9055in" svg:x2="4.5272in" svg:y2="6.9055in"><text:p text:style-name="P11"><text:span text:style-name="T7"><text:s text:c="3"/></text:span></text:p><text:p text:style-name="P11"><text:span text:style-name="T7"><text:s text:c="3"/></text:span></text:p><text:p text:style-name="P11"><text:span text:style-name="T7"><text:s text:c="4"/>17th year 2Ki 16:1</text:span></text:p></draw:line><draw:line draw:style-name="gr12" draw:text-style-name="P6" svg:x1="5.1646in" svg:y1="6.9055in" svg:x2="5.9445in" svg:y2="6.9055in"><text:p text:style-name="P5"><text:span text:style-name="T7">Age: 40 <text:s text:c="29"/></text:span></text:p><text:p text:style-name="P5"><text:span text:style-name="T7">Age: 20</text:span></text:p></draw:line><draw:line draw:style-name="gr10" draw:text-style-name="P6" svg:x1="3.674in" svg:y1="7.4067in" svg:x2="4.2642in" svg:y2="7.4067in"><text:p text:style-name="P5"><text:span text:style-name="T7">5th year <text:s text:c="2"/></text:span></text:p><text:p text:style-name="P5"><text:span text:style-name="T7"/></text:p></draw:line><draw:line draw:style-name="gr15" draw:text-style-name="P6" svg:x1="3.2228in" svg:y1="8.1055in" svg:x2="4.2646in" svg:y2="8.1055in"><text:p text:style-name="P5"><text:span text:style-name="T7">Began to reign in Samaria <text:s text:c="56"/></text:span></text:p><text:p text:style-name="P5"><text:span text:style-name="T7">12th year 2Ki 17:1</text:span></text:p></draw:line><draw:line draw:style-name="gr11" draw:text-style-name="P12" svg:x1="2.0583in" svg:y1="7.7047in" svg:x2="6.3961in" svg:y2="7.7039in"><text:p text:style-name="P11"><text:span text:style-name="T7"><text:s text:c="3"/></text:span></text:p><text:p text:style-name="P11"><text:span text:style-name="T7"><text:s text:c="3"/></text:span></text:p><text:p text:style-name="P11"><text:span text:style-name="T7"><text:s text:c="4"/>3rd year 2Ki 18:1</text:span></text:p></draw:line><draw:line draw:style-name="gr12" draw:text-style-name="P6" svg:x1="6.3846in" svg:y1="7.7039in" svg:x2="7.0846in" svg:y2="7.7039in"><text:p text:style-name="P5"><text:span text:style-name="T7">Age: 28 <text:s text:c="58"/></text:span></text:p><text:p text:style-name="P5"><text:span text:style-name="T7">Age: 25</text:span></text:p></draw:line><draw:line draw:style-name="gr10" draw:text-style-name="P6" svg:x1="4.263in" svg:y1="8.1055in" svg:x2="5.4417in" svg:y2="8.1055in"><text:p text:style-name="P5"><text:span text:style-name="T7">4th year 2Ki 18:9 <text:s/></text:span></text:p><text:p text:style-name="P5"><text:span text:style-name="T7"/></text:p></draw:line><draw:line draw:style-name="gr16" draw:text-style-name="P12" svg:x1="2.0583in" svg:y1="8.1055in" svg:x2="3.2181in" svg:y2="8.1055in"><text:p text:style-name="P11"><text:span text:style-name="T7"/></text:p><text:p text:style-name="P11"><text:span text:style-name="T7"><text:s text:c="4"/>7th year 2Ki 18:9</text:span></text:p></draw:line><draw:line draw:style-name="gr10" draw:text-style-name="P6" svg:x1="0.9024in" svg:y1="8.3043in" svg:x2="5.4417in" svg:y2="8.3043in"><text:p text:style-name="P5"><text:span text:style-name="T7"><text:s text:c="10"/>9th year <text:s text:c="153"/></text:span></text:p><text:p text:style-name="P5"><text:span text:style-name="T7">In the 6th year 2Ki 18:10 <text:s text:c="2"/></text:span></text:p></draw:line><draw:line draw:style-name="gr12" draw:text-style-name="P6" svg:x1="4.9701in" svg:y1="2.9055in" svg:x2="6.0787in" svg:y2="2.9055in"><text:p text:style-name="P5"><text:span text:style-name="T7">Jotham is born</text:span></text:p><text:p text:style-name="P5"><text:span text:style-name="T7">29th year, Uzziah age: 45</text:span></text:p></draw:line><draw:line draw:style-name="gr12" draw:text-style-name="P6" svg:x1="4.6831in" svg:y1="5.2008in" svg:x2="5.3031in" svg:y2="5.2008in"><text:p text:style-name="P5"><text:span text:style-name="T7">Age: 68</text:span></text:p><text:p text:style-name="P5"><text:span text:style-name="T7"/></text:p></draw:line><draw:line draw:style-name="gr12" draw:text-style-name="P6" svg:x1="6.385in" svg:y1="10.6043in" svg:x2="7.2551in" svg:y2="10.6043in"><text:p text:style-name="P5"><text:span text:style-name="T7">Age: 54</text:span></text:p><text:p text:style-name="P5"><text:span text:style-name="T7"/></text:p></draw:line><draw:line draw:style-name="gr10" draw:text-style-name="P6" svg:x1="3.674in" svg:y1="7.7055in" svg:x2="4.2642in" svg:y2="7.7055in"><text:p text:style-name="P5"><text:span text:style-name="T7">8th year <text:s text:c="2"/></text:span></text:p><text:p text:style-name="P5"><text:span text:style-name="T7"/></text:p></draw:line><draw:line draw:style-name="gr12" draw:text-style-name="P6" svg:x1="5.3031in" svg:y1="5.2008in" svg:x2="6.163in" svg:y2="5.2008in"><text:p text:style-name="P5"><text:span text:style-name="T7">Hezekiah is born <text:s/></text:span></text:p><text:p text:style-name="P5"><text:span text:style-name="T7">Ahaz age: 3 <text:s/></text:span></text:p></draw:line><draw:line draw:style-name="gr12" draw:text-style-name="P6" svg:x1="4.9642in" svg:y1="4.9071in" svg:x2="6.324in" svg:y2="4.9071in"><text:p text:style-name="P5"><text:span text:style-name="T7">Ahaz is born</text:span></text:p><text:p text:style-name="P5"><text:span text:style-name="T7">Jotham age: 20</text:span></text:p></draw:line><draw:line draw:style-name="gr17" draw:text-style-name="P15" svg:x1="1.4091in" svg:y1="7.211in" svg:x2="1.4091in" svg:y2="7.402in"><text:p text:style-name="P14"><text:span text:style-name="T10">2</text:span></text:p></draw:line><draw:line draw:style-name="gr17" draw:text-style-name="P15" svg:x1="1.4122in" svg:y1="4.9083in" svg:x2="1.4122in" svg:y2="5.0063in"><text:p text:style-name="P14"><text:span text:style-name="T10">1</text:span></text:p></draw:line><draw:line draw:style-name="gr17" draw:text-style-name="P15" svg:x1="4.2886in" svg:y1="5.2146in" svg:x2="4.2886in" svg:y2="5.4055in"><text:p text:style-name="P14"><text:span text:style-name="T10">2</text:span></text:p></draw:line><draw:line draw:style-name="gr10" draw:text-style-name="P6" svg:x1="1.0992in" svg:y1="5.2055in" svg:x2="3.8693in" svg:y2="5.2055in"><text:p text:style-name="P5"><text:span text:style-name="T7"/></text:p><text:p text:style-name="P5"><text:span text:style-name="T7">52nd year 2Ki 15:27 <text:s text:c="15"/></text:span></text:p></draw:line><draw:custom-shape draw:style-name="gr18" draw:text-style-name="P8" svg:width="1.3004in" svg:height="5.2004in" svg:x="3.6697in" svg:y="0.0008in"><draw:glue-point draw:id="4" svg:x="0.8024in" svg:y="-1.9685in"/><text:p text:style-name="P7"><text:span text:style-name="T8">Azariah/Uzziah/Ozias</text:span></text:p><text:p text:style-name="P7"><text:span text:style-name="T8">52yrs</text:span></text:p><text:p text:style-name="P7"><text:span text:style-name="T8">2Ki 14:21</text:span><text:span text:style-name="T8"><text:line-break/></text:span><text:span text:style-name="T8">2Ki 15:1,2</text:span></text:p><text:p text:style-name="P7"><text:span text:style-name="T8">2Ch 26:1,3</text:span></text:p><text:p text:style-name="P7"><text:span text:style-name="T8">Mat 1:8,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9" draw:text-style-name="P8" svg:width="1.3004in" svg:height="2.9004in" svg:x="5.4272in" svg:y="7.7043in"><text:p text:style-name="P7"><text:span text:style-name="T8">Hezekiah/Ezekias</text:span></text:p><text:p text:style-name="P7"><text:span text:style-name="T8">29yrs</text:span></text:p><text:p text:style-name="P7"><text:span text:style-name="T8">2Ki 16:20</text:span></text:p><text:p text:style-name="P7"><text:span text:style-name="T8">2Ch 29:1</text:span></text:p><text:p text:style-name="P7"><text:span text:style-name="T8">Mat 1:9,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20" draw:text-style-name="P8" svg:width="1.3004in" svg:height="0.9004in" svg:x="0.7591in" svg:y="7.4051in"><text:p text:style-name="P7"><text:span text:style-name="T11">Hoshea</text:span></text:p><text:p text:style-name="P7"><text:span text:style-name="T8">son of Elah</text:span></text:p><text:p text:style-name="P7"><text:span text:style-name="T8">9yrs</text:span></text:p><text:p text:style-name="P7"><text:span text:style-name="T8">2Ki 15:30, 17:1, 18:9,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21" draw:text-style-name="P16" svg:x1="6.1465in" svg:y1="5.2008in" svg:x2="6.1465in" svg:y2="7.7039in"><text:p text:style-name="P14"><text:span text:style-name="T10">25</text:span></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Notice anything unusual? <text:span text:style-name="T6">Hezekiah is age 25 when he begins to reign in the 8</text:span><text:span text:style-name="T12">th</text:span><text:span text:style-name="T6"> year of his father Ahaz, </text:span><text:span text:style-name="T13">who was 28 at that time, making Ahaz just 3 years older than his son Hezekiah. </text:span><text:span text:style-name="T14">So, </text:span><text:span text:style-name="T13">Ahaz was 3 years old when his son Hezekiah was born.</text:span></text:p>
      <text:p text:style-name="P18"><text:soft-page-break/>How was Ahaziah both <text:span text:style-name="T15">age </text:span>22 &amp; <text:span text:style-name="T15">age </text:span>42 when he began to reign <text:span text:style-name="T16">and how did he begin to reign in both the</text:span> 11<text:span text:style-name="T17">th</text:span> and <text:span text:style-name="T16">the </text:span>12<text:span text:style-name="T17">th</text:span> year of Jehoram king of Israel?</text:p>
      <text:p text:style-name="Standard"/>
      <table:table table:name="Table1" table:style-name="Table1">
        <table:table-column table:style-name="Table1.A"/>
        <table:table-row>
          <table:table-cell table:style-name="Table1.A1" office:value-type="string">
            <text:p text:style-name="P19"><text:span text:style-name="T18">2 Kings 8:25-26</text:span><text:line-break/><text:span text:style-name="T19">25</text:span> In the twelfth year of Joram the son of Ahab king of Israel did <text:span text:style-name="T20">Ahaziah the son of Jehoram king of Judah begin to reign</text:span>.</text:p>
            <text:p text:style-name="P19"><text:span text:style-name="T19">26</text:span> <text:span text:style-name="T20">Two and twenty years old </text:span><text:span text:style-name="T21">was</text:span><text:span text:style-name="T20"> Ahaziah when he began to reign</text:span>; and he reigned one year in Jerusalem. And his mother's name <text:span text:style-name="T22">was</text:span> Athaliah, the daughter of Omri king of Israel.</text:p>
          </table:table-cell>
        </table:table-row>
        <table:table-row>
          <table:table-cell table:style-name="Table1.A2" office:value-type="string">
            <text:p text:style-name="P19"><text:span text:style-name="T18">2 Chronicles 22:1-2</text:span> (<text:span text:style-name="T23">2Ch 21:</text:span><text:span text:style-name="T24">12-20</text:span>)<text:line-break/><text:span text:style-name="T19">1</text:span> And the inhabitants of Jerusalem made <text:span text:style-name="T20">Ahaziah</text:span> his youngest son king in his stead: for the band of men that came with the Arabians to the camp had slain all the eldest. So <text:span text:style-name="T20">Ahaziah the son of Jehoram king of Judah</text:span> reigned.</text:p>
            <text:p text:style-name="P19"><text:span text:style-name="T19">2</text:span> <text:span text:style-name="T20">Forty and two years old </text:span><text:span text:style-name="T21">was</text:span><text:span text:style-name="T20"> Ahaziah when he began to reign</text:span>, and he reigned one year in Jerusalem. His mother's name also <text:span text:style-name="T22">was</text:span> Athaliah the daughter of Omri.</text:p>
          </table:table-cell>
        </table:table-row>
      </table:table>
      <text:p text:style-name="P17"/>
      <text:p text:style-name="P20">This next one <text:span text:style-name="T25">can be</text:span> fairly simple. If you don’t believe God (<text:span text:style-name="T18">Psa 12:6,7</text:span>) then you can write it off as a scribal mistake <text:span text:style-name="T26">and believe the lie that only the original manuscripts were free from error</text:span>. <text:span text:style-name="T27">However, if you do believe God </text:span><text:span text:style-name="T28">when </text:span><text:span text:style-name="T29">H</text:span><text:span text:style-name="T28">e promised to preserve His word from this generation for ever</text:span><text:span text:style-name="T27">, then </text:span><text:span text:style-name="T28">it</text:span><text:span text:style-name="T27"> is also </text:span><text:span text:style-name="T30">relatively</text:span><text:span text:style-name="T27"> simple </text:span><text:span text:style-name="T31">because</text:span><text:span text:style-name="T27"> a man</text:span><text:span text:style-name="T32"> </text:span><text:span text:style-name="T27">cannot </text:span><text:span text:style-name="T30">normally </text:span><text:span text:style-name="T27">be two different ages at the </text:span><text:span text:style-name="T33">same time</text:span><text:span text:style-name="T27">.</text:span></text:p>
      <text:p text:style-name="P20"/>
      <text:p text:style-name="P20"><text:span text:style-name="T34">So, immediately we know that we aren’t dealing with one man: instead </text:span><text:span text:style-name="T35">there are </text:span><text:span text:style-name="T34">two different men with the same name. </text:span><text:span text:style-name="T36">We could stop there but if we did we would miss out on </text:span><text:span text:style-name="T37">all </text:span><text:span text:style-name="T36">the juicy details </text:span><text:span text:style-name="T38">and there are quite a few; </text:span><text:span text:style-name="T39">however, this endeavour is not for the feint of heart. It requires putting together quite a bit of information from quite a few verses </text:span><text:span text:style-name="T40">all while keeping track of </text:span><text:span text:style-name="T41">more than a few</text:span><text:span text:style-name="T40"> conditions that need to be met to </text:span><text:span text:style-name="T42">completely </text:span><text:span text:style-name="T40">agree with scripture</text:span><text:span text:style-name="T39">. </text:span><text:span text:style-name="T43">And while we have assembled them all together in a nice little chart you should still review all </text:span><text:span text:style-name="T44">of the relevant verses very </text:span><text:span text:style-name="T43">carefully </text:span><text:span text:style-name="T44">for </text:span><text:span text:style-name="T43">yourself </text:span><text:span text:style-name="T45">(</text:span><text:span text:style-name="T46">Acts 17:11</text:span><text:span text:style-name="T45">). </text:span><text:span text:style-name="T40">It is a lot to take in so don’t expect to finish this one in 10 minutes or even 1 day. </text:span><text:span text:style-name="T44">The chart takes up an entire page by itself, so let’s go over some important details in the mean time.</text:span></text:p>
      <text:p text:style-name="P20"/>
      <table:table table:name="Table2" table:style-name="Table2">
        <table:table-column table:style-name="Table2.A"/>
        <table:table-row>
          <table:table-cell table:style-name="Table2.A1" office:value-type="string">
            <text:p text:style-name="P19"><text:span text:style-name="T18">2 Chronicles 18:1-2</text:span><text:line-break/><text:span text:style-name="T19">1</text:span> Now Jehoshaphat had riches and honour in abundance, and <text:span text:style-name="T20">joined affinity</text:span> with Ahab.</text:p>
            <text:p text:style-name="P19"><text:span text:style-name="T19">2</text:span> And after <text:span text:style-name="T22">certain</text:span> years he went down to Ahab to Samaria. And Ahab killed sheep and oxen for him <text:span text:style-name="T20">in abundance, and for the people that </text:span><text:span text:style-name="T21">he had</text:span><text:span text:style-name="T20"> with him</text:span>, and persuaded him to go up <text:span text:style-name="T22">with him</text:span> to Ramoth-gilead.</text:p>
          </table:table-cell>
        </table:table-row>
      </table:table>
      <text:list text:style-name="L1">
        <text:list-item>
          <text:p text:style-name="P21">The word “affinity” occurs three times in the Bible and it’s meaning is quite easy to ascertain simply from the context of each <text:span text:style-name="T47">time that it is used</text:span> (<text:span text:style-name="T18">1Ki 3:1</text:span>, <text:span text:style-name="T18">2Ch 18:1</text:span>, <text:span text:style-name="T18">Ezr 9:14</text:span>).</text:p>
          <text:list>
            <text:list-item>
              <text:p text:style-name="P21">And that meaning is simply “marriage” <text:span text:style-name="T48">or “alliance through marriage” </text:span><text:span text:style-name="T49">as we</text:span><text:span text:style-name="T50"> </text:span><text:span text:style-name="T49">see in </text:span><text:span text:style-name="T51">2Ch 18:1</text:span><text:span text:style-name="T49">.</text:span></text:p>
            </text:list-item>
          </text:list>
        </text:list-item>
        <text:list-item>
          <text:p text:style-name="P21">Take note <text:span text:style-name="T52">also </text:span>that in verse <text:span text:style-name="T18">2</text:span>, Ahab provides for a large feast for the event.</text:p>
        </text:list-item>
        <text:list-item>
          <text:p text:style-name="P22">And then the natural question arises, who among Ahab’s house could Jehoshaphat have married?</text:p>
          <text:list>
            <text:list-item>
              <text:p text:style-name="P23">If you weren’t already aware, Ahab is a son of Omri king of Israel.</text:p>
            </text:list-item>
          </text:list>
        </text:list-item>
      </text:list>
      <text:p text:style-name="P24"/>
      <table:table table:name="Table3" table:style-name="Table3">
        <table:table-column table:style-name="Table3.A"/>
        <table:table-row>
          <table:table-cell table:style-name="Table3.A1" office:value-type="string">
            <text:p text:style-name="P25">2 Kings 11:1</text:p>
            <text:p text:style-name="P26">And when <text:span text:style-name="T20">Athaliah the mother of Ahaziah</text:span> saw that <text:span text:style-name="T20">her son</text:span> was dead, she arose and destroyed all the seed royal.</text:p>
          </table:table-cell>
        </table:table-row>
        <table:table-row>
          <table:table-cell table:style-name="Table3.A2" office:value-type="string">
            <text:p text:style-name="P25">2 Chronicles 22:10</text:p>
            <text:p text:style-name="P26">But when <text:span text:style-name="T20">Athaliah the mother of Ahaziah</text:span> saw that <text:span text:style-name="T20">her son</text:span> was dead, she arose and destroyed all the seed royal of the house of Judah.</text:p>
          </table:table-cell>
        </table:table-row>
      </table:table>
      <text:list text:style-name="L2">
        <text:list-item>
          <text:p text:style-name="P27">Twice we are told that (queen) Athaliah saw that her <text:span text:style-name="T53">(singular) </text:span>son was dead. <text:span text:style-name="T54">Why not plural? You’ll find out more about that later but for now </text:span><text:span text:style-name="T55">just know that </text:span><text:span text:style-name="T54">this is a crucial detail.</text:span></text:p>
        </text:list-item>
      </text:list>
      <text:p text:style-name="P28"/>
      <table:table table:name="Table4" table:style-name="Table4">
        <table:table-column table:style-name="Table4.A"/>
        <table:table-row>
          <table:table-cell table:style-name="Table4.A1" office:value-type="string">
            <text:p text:style-name="P29"><text:span text:style-name="T18">2 Kings 9:27-29</text:span><text:line-break/><text:span text:style-name="T19">27</text:span> But when <text:span text:style-name="T20">Ahaziah the king of Judah</text:span> saw <text:span text:style-name="T22">this</text:span>, he fled by the way of the garden house. And <text:span text:style-name="T20">Jehu</text:span> followed after him, and said, Smite him also in the chariot. <text:span text:style-name="T22">And they did so</text:span> at the going up to Gur, which <text:span text:style-name="T22">is</text:span> by Ibleam. <text:span text:style-name="T20">And he fled to Megiddo, and died there</text:span>.<text:line-break/><text:span text:style-name="T19">28</text:span> And his servants carried him in a chariot to Jerusalem, and buried him in his sepulchre with his fathers in the city of David.<text:line-break/><text:span text:style-name="T19">29</text:span> And in the eleventh year of Joram the son of Ahab <text:span text:style-name="T20">began Ahaziah to reign over Judah</text:span>.</text:p>
          </table:table-cell>
        </table:table-row>
      </table:table>
      <text:list text:style-name="L3">
        <text:list-item>
          <text:p text:style-name="P30">Right after Ahaziah dies <text:span text:style-name="T56">in Megiddo (</text:span><text:span text:style-name="T57">which is another important detail</text:span><text:span text:style-name="T56">) </text:span>we are told that Ahaziah began to reign in the <text:span text:style-name="T58">11</text:span><text:span text:style-name="T59">th</text:span> year of Joram the son of Ahab (king of Israel).</text:p>
          <text:list>
            <text:list-item>
              <text:p text:style-name="P31">But, I thought he just died? <text:span text:style-name="T60">I</text:span><text:span text:style-name="T61">t’s not unusual for the Bible to not be </text:span><text:span text:style-name="T62">written </text:span><text:span text:style-name="T61">in chronologic</text:span><text:span text:style-name="T62">al order</text:span><text:span text:style-name="T61"> by itself; but</text:span>, <text:span text:style-name="T63">2Ki 8:25</text:span><text:span text:style-name="T64"> tells us that Ahaziah began to reign in the </text:span><text:span text:style-name="T65">12</text:span><text:span text:style-name="T66">th</text:span><text:span text:style-name="T64"> year of Joram the son of Ahab king of Israel.</text:span></text:p>
            </text:list-item>
          </text:list>
        </text:list-item>
        <text:list-item>
          <text:p text:style-name="P32">Now this is something we can work with. We have two different men, they began to reign at <text:span text:style-name="T67">two </text:span>different ages, <text:span text:style-name="T67">at two </text:span>different times, <text:span text:style-name="T68">and they died two different ways (</text:span><text:span text:style-name="T69">2Ki 9:27</text:span><text:span text:style-name="T68">, </text:span><text:span text:style-name="T70">2Ch 22:9</text:span><text:span text:style-name="T71">).</text:span></text:p>
        </text:list-item>
      </text:list>
      <text:p text:style-name="P20"><text:soft-page-break/></text:p>
      <text:p text:style-name="P20"/>
      <text:p text:style-name="P20"/>
      <text:p text:style-name="P20"/>
      <text:p text:style-name="P20"/>
      <text:p text:style-name="P20"/>
      <text:p text:style-name="P20"><draw:g text:anchor-type="paragraph" draw:z-index="1" draw:name="Group object 2" draw:style-name="gr1"><draw:line draw:style-name="gr3" draw:text-style-name="P33" svg:x1="5.1268in" svg:y1="7.3039in" svg:x2="5.7665in" svg:y2="7.3039in"><text:p text:style-name="P5"><text:span text:style-name="T72">Age: 40</text:span></text:p><text:p text:style-name="P5"><text:span text:style-name="T72"/></text:p></draw:line><draw:line draw:style-name="gr3" draw:text-style-name="P33" svg:x1="4.2681in" svg:y1="11.9035in" svg:x2="5.148in" svg:y2="11.9035in"><text:p text:style-name="P5"><text:span text:style-name="T72">Age: 47</text:span></text:p><text:p text:style-name="P5"><text:span text:style-name="T72"/></text:p></draw:line><draw:line draw:style-name="gr15" draw:text-style-name="P33" svg:x1="0.4173in" svg:y1="3.1028in" svg:x2="3.3575in" svg:y2="3.1028in"><text:p text:style-name="P5"><text:span text:style-name="T72"/></text:p><text:p text:style-name="P5"><text:span text:style-name="T72">31st year</text:span></text:p><text:p text:style-name="P5"><text:span text:style-name="T72">1Ki 16:23</text:span></text:p><text:p text:style-name="P5"><text:span text:style-name="T72"/></text:p></draw:line><draw:line draw:style-name="gr15" draw:text-style-name="P33" svg:x1="2.1114in" svg:y1="3.6028in" svg:x2="3.3472in" svg:y2="3.6028in"><text:p text:style-name="P5"><text:span text:style-name="T72">36th year <text:s text:c="4"/></text:span></text:p><text:p text:style-name="P5"><text:span text:style-name="T72">Baasha came up against <text:s text:c="4"/></text:span></text:p><text:p text:style-name="P5"><text:span text:style-name="T72">Judah 1Ki 15:17, 2Ch 16:1 <text:s text:c="4"/></text:span></text:p><text:p text:style-name="P5"><text:span text:style-name="T72"/></text:p></draw:line><draw:line draw:style-name="gr15" draw:text-style-name="P33" svg:x1="2.1114in" svg:y1="3.7992in" svg:x2="3.3476in" svg:y2="3.7992in"><text:p text:style-name="P5"><text:span text:style-name="T72">38th year</text:span></text:p><text:p text:style-name="P5"><text:span text:style-name="T72">1Ki 16:29 <text:s text:c="4"/></text:span></text:p></draw:line><draw:line draw:style-name="gr22" draw:text-style-name="P34" xml:id="id11" draw:id="id11" svg:x1="2.7291in" svg:y1="2.4709in" svg:x2="2.7295in" svg:y2="3.6028in"><draw:glue-point draw:id="4" svg:x="3.937in" svg:y="1.5709in"/><text:p/></draw:line><draw:line draw:style-name="gr23" draw:text-style-name="P35" svg:x1="2.5709in" svg:y1="2.698in" svg:x2="3.3469in" svg:y2="2.6984in"><text:p text:style-name="P11"><text:span text:style-name="T72"/></text:p><text:p text:style-name="P11"><text:span text:style-name="T72"/></text:p><text:p text:style-name="P11"><text:span text:style-name="T72"/></text:p><text:p text:style-name="P11"><text:span text:style-name="T72"><text:s text:c="15"/>27th year</text:span></text:p><text:p text:style-name="P11"><text:span text:style-name="T72"><text:s text:c="4"/>Zimri kills Elah</text:span></text:p><text:p text:style-name="P11"><text:span text:style-name="T72"><text:s text:c="14"/>1Ki 16:10 <text:s text:c="4"/></text:span></text:p></draw:line><draw:line draw:style-name="gr24" draw:text-style-name="P36" svg:x1="0.852in" svg:y1="6.7012in" svg:x2="2.7319in" svg:y2="6.7012in"><text:p text:style-name="P14"><text:span text:style-name="T72"/></text:p><text:p text:style-name="P14"><text:span text:style-name="T72">Ahaziah dies</text:span></text:p></draw:line><draw:custom-shape draw:style-name="gr25" draw:text-style-name="P38" svg:width="1.3004in" svg:height="0.6004in" svg:x="3.3591in" svg:y="7.3043in"><text:p text:style-name="P37"><text:span text:style-name="T73">Athaliah</text:span><text:span text:style-name="T74"> (Jehoram)</text:span></text:p><text:p text:style-name="P37"><text:span text:style-name="T74">daughter of Ahab</text:span></text:p><text:p text:style-name="P37"><text:span text:style-name="T72">2Ki 8:18,26, 11:1-3,13,14,20, 2Ch 22:10,11, 23:12,13,21</text:span></text:p><text:p text:style-name="P37"><text:span text:style-name="T72">6yrs 2Ch 22:12, 23: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26" draw:text-style-name="P40" svg:width="1.2197in" svg:height="0.2004in" svg:x="0.1902in" svg:y="2.6035in"><text:p text:style-name="P39"><text:span text:style-name="T75">Elah 2yrs 1Ki 16:6,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5" draw:text-style-name="P33" svg:x1="2.6827in" svg:y1="2.6028in" svg:x2="3.3472in" svg:y2="2.6028in"><text:p text:style-name="P5"><text:span text:style-name="T72">26th year</text:span></text:p><text:p text:style-name="P5"><text:span text:style-name="T72">1Ki 16:8</text:span></text:p><text:p text:style-name="P5"><text:span text:style-name="T72"/></text:p><text:p text:style-name="P5"><text:span text:style-name="T72"/></text:p></draw:line><draw:line draw:style-name="gr3" draw:text-style-name="P33" svg:x1="0.4961in" svg:y1="3.6992in" svg:x2="0.8114in" svg:y2="3.6992in"><text:p text:style-name="P5"><text:span text:style-name="T72"/></text:p><text:p text:style-name="P5"><text:span text:style-name="T72">6yrs</text:span></text:p></draw:line><draw:line draw:style-name="gr3" draw:text-style-name="P33" svg:x1="3.589in" svg:y1="4.2012in" svg:x2="5.8689in" svg:y2="4.2012in"><text:p text:style-name="P5"><text:span text:style-name="T72"/></text:p><text:p text:style-name="P5"><text:span text:style-name="T72">Age: 35 1Ki 22:42, 2Ch 20:31</text:span></text:p></draw:line><draw:line draw:style-name="gr3" draw:text-style-name="P33" svg:x1="5.1654in" svg:y1="6.5055in" svg:x2="5.7654in" svg:y2="6.5055in"><text:p text:style-name="P5"><text:span text:style-name="T72">Age: 58</text:span></text:p><text:p text:style-name="P5"><text:span text:style-name="T72">Age: 32</text:span></text:p></draw:line><draw:line draw:style-name="gr27" draw:text-style-name="P33" svg:x1="4.2681in" svg:y1="7.9043in" svg:x2="5.148in" svg:y2="7.9043in"><text:p text:style-name="P5"><text:span text:style-name="T72"/></text:p><text:p text:style-name="P5"><text:span text:style-name="T72">Age: 7</text:span></text:p><text:p text:style-name="P5"><text:span text:style-name="T72">2Ki 11:21</text:span></text:p></draw:line><draw:line draw:style-name="gr15" draw:text-style-name="P33" svg:x1="2.6874in" svg:y1="5.9035in" svg:x2="3.3583in" svg:y2="5.9035in"><text:p text:style-name="P5"><text:span text:style-name="T72"><text:s text:c="8"/>17th year</text:span></text:p><text:p text:style-name="P5"><text:span text:style-name="T72">1Ki 22:51</text:span></text:p></draw:line><draw:custom-shape draw:style-name="gr28" draw:text-style-name="P42" svg:width="1.3004in" svg:height="1.2004in" svg:x="1.4299in" svg:y="6.0043in"><text:p text:style-name="P41"><text:span text:style-name="T76">Jehoram/Joram</text:span></text:p><text:p text:style-name="P41"><text:span text:style-name="T76">12yrs</text:span></text:p><text:p text:style-name="P41"><text:span text:style-name="T77">In Samaria</text:span></text:p><text:p text:style-name="P41"><text:span text:style-name="T76">2Ki 3:1</text:span></text:p><text:p text:style-name="P41"><text:span text:style-name="T76">2Ki 1:17</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5" draw:text-style-name="P33" svg:x1="2.4327in" svg:y1="6.0039in" svg:x2="3.3583in" svg:y2="6.0039in"><text:p text:style-name="P5"><text:span text:style-name="T72"/></text:p><text:p text:style-name="P5"><text:span text:style-name="T72"/></text:p><text:p text:style-name="P5"><text:span text:style-name="T72">18th year</text:span></text:p><text:p text:style-name="P5"><text:span text:style-name="T72">2Ki 3:1</text:span></text:p></draw:line><draw:custom-shape draw:style-name="gr29" draw:text-style-name="P44" svg:width="1.3004in" svg:height="1.7004in" svg:x="1.4303in" svg:y="10.2043in"><text:p text:style-name="P43"><text:span text:style-name="T78">Jehoahaz</text:span></text:p><text:p text:style-name="P43"><text:span text:style-name="T78">17yrs</text:span></text:p><text:p text:style-name="P43"><text:span text:style-name="T78">2Ki 13: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6" draw:text-style-name="P35" svg:x1="2.7299in" svg:y1="7.9043in" svg:x2="3.6461in" svg:y2="7.9043in"><text:p text:style-name="P11"><text:span text:style-name="T72"/></text:p><text:p text:style-name="P11"><text:span text:style-name="T72">7th year</text:span></text:p><text:p text:style-name="P11"><text:span text:style-name="T72">2Ki 12:1</text:span></text:p><text:p text:style-name="P11"><text:span text:style-name="T72">2Ch 23:1</text:span></text:p></draw:line><draw:line draw:style-name="gr30" draw:text-style-name="P33" svg:x1="2.4484in" svg:y1="10.2043in" svg:x2="3.3602in" svg:y2="10.2043in"><text:p text:style-name="P5"><text:span text:style-name="T72"/></text:p><text:p text:style-name="P5"><text:span text:style-name="T72">23rd year</text:span></text:p><text:p text:style-name="P5"><text:span text:style-name="T72">2Ki 13:1</text:span></text:p></draw:line><draw:line draw:style-name="gr15" draw:text-style-name="P33" svg:x1="2.7299in" svg:y1="11.6043in" svg:x2="3.3598in" svg:y2="11.6043in"><text:p text:style-name="P5"><text:span text:style-name="T72">14th year - 37th year</text:span></text:p><text:p text:style-name="P5"><text:span text:style-name="T72">1Ki 13:10</text:span></text:p></draw:line><draw:custom-shape draw:style-name="gr31" draw:text-style-name="P45" svg:width="1.3205in" svg:height="0.0098in" svg:x="1.4091in" svg:y="2.698in"><text:p text:style-name="P37"><text:span text:style-name="T74"/></text:p><text:p text:style-name="P37"><text:span text:style-name="T74">Zimri 7 days 1Ki 16:1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2" draw:text-style-name="P47" xml:id="id10" draw:id="id10" svg:width="1.1551in" svg:height="0.448in" svg:x="0.0992in" svg:y="2.0008in"><text:p text:style-name="P46"><text:span text:style-name="T79">Baasha survived his son Elah by at least 9 years</text:span></text:p><text:p text:style-name="P46"><text:span text:style-name="T79">(2Ch 16:1 – 1Ki 16:10)</text:span></text:p><draw:enhanced-geometry svg:viewBox="0 0 21600 21600" draw:mirror-horizontal="false" draw:mirror-vertical="false" draw:type="rectangle" draw:enhanced-path="M 0 0 L 21600 0 21600 21600 0 21600 0 0 Z N"/></draw:custom-shape><draw:custom-shape draw:style-name="gr33" draw:text-style-name="P47" xml:id="id5" draw:id="id5" svg:width="0.9461in" svg:height="1.1614in" svg:x="0.3713in" svg:y="7.4035in"><text:p text:style-name="P46"><text:span text:style-name="T80">In order for Athaliah’s reign to end in the 7</text:span><text:span text:style-name="T81">th</text:span><text:span text:style-name="T80"> year</text:span></text:p><text:p text:style-name="P46"><text:span text:style-name="T80">(2Ch 22:12, 23:1) Jehu’s reign had to begin the same year that younger Ahaziah’s reign began (because Jehu’s 7</text:span><text:span text:style-name="T81">th</text:span><text:span text:style-name="T80"> year is Joash’s first).</text:span></text:p><draw:enhanced-geometry svg:viewBox="0 0 21600 21600" draw:mirror-horizontal="false" draw:mirror-vertical="false" draw:type="rectangle" draw:enhanced-path="M 0 0 L 21600 0 21600 21600 0 21600 0 0 Z N"/></draw:custom-shape><draw:line draw:style-name="gr16" draw:text-style-name="P35" svg:x1="1.7469in" svg:y1="4.2012in" svg:x2="4.7067in" svg:y2="4.2012in"><text:p text:style-name="P11"><text:span text:style-name="T72"><text:s text:c="5"/>4th year</text:span></text:p><text:p text:style-name="P11"><text:span text:style-name="T72"><text:s text:c="5"/>1Ki 22:41</text:span></text:p></draw:line><draw:line draw:style-name="gr34" draw:text-style-name="P48" svg:x1="0.8524in" svg:y1="6.1039in" svg:x2="0.8524in" svg:y2="6.7012in"><text:p text:style-name="P14"><text:span text:style-name="T82">8 years</text:span></text:p></draw:line><draw:line draw:style-name="gr3" draw:text-style-name="P33" svg:x1="4.6587in" svg:y1="5.0039in" svg:x2="6.4787in" svg:y2="5.0039in"><text:p text:style-name="P5"><text:span text:style-name="T72"/></text:p><text:p text:style-name="P5"><text:span text:style-name="T72">8th year <text:s text:c="28"/>Younger Ahaziah born</text:span></text:p><text:p text:style-name="P5"><text:span text:style-name="T72">Jehoram (father in law) age: 17</text:span></text:p><text:p text:style-name="P5"><text:span text:style-name="T72">Jehoshaphat (grandfather in law) age: 43</text:span></text:p></draw:line><draw:line draw:style-name="gr3" draw:text-style-name="P33" svg:x1="4.6587in" svg:y1="2.9012in" svg:x2="6.3587in" svg:y2="2.9012in"><text:p text:style-name="P5"><text:span text:style-name="T72">29th year <text:s text:c="21"/>Elder Ahaziah born </text:span></text:p><text:p text:style-name="P5"><text:span text:style-name="T72">Jehoshaphat (father in law) <text:s/>age: 22 </text:span></text:p></draw:line><draw:custom-shape draw:style-name="gr35" draw:text-style-name="P50" xml:id="id4" draw:id="id4" svg:width="1.1386in" svg:height="0.6004in" svg:x="6.272in" svg:y="2.9016in"><text:p text:style-name="P49"><text:span text:style-name="T73">Athaliah</text:span><text:span text:style-name="T83"> (</text:span><text:span text:style-name="T74">Jehoshaphat) daughter of Omri</text:span></text:p><text:p text:style-name="P49"><text:span text:style-name="T74">2Ch 18:1,2, 22:2,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6" draw:text-style-name="P52" xml:id="id7" draw:id="id7" svg:width="1.4406in" svg:height="1.7406in" svg:x="5.1772in" svg:y="7.7098in"><draw:glue-point draw:id="4" svg:x="-1.272in" svg:y="-1.9701in"/><text:p text:style-name="P51"><text:span text:style-name="T80">Son in law to Jehoram (2Ki 8:27)</text:span></text:p><text:p text:style-name="P51"><text:span text:style-name="T80">2Ki 8:24-29</text:span></text:p><text:p text:style-name="P51"><text:span text:style-name="T80">2Ki 9:16,21,23,27,28</text:span></text:p><text:p text:style-name="P51"><text:span text:style-name="T80">2Ki 11:1,2</text:span></text:p><text:p text:style-name="P51"><text:span text:style-name="T80">2Ch 21:17</text:span></text:p><text:p text:style-name="P51"><text:span text:style-name="T80">2Ch 22:1,6,7,10</text:span></text:p><text:p text:style-name="P51"><text:span text:style-name="T80">Dies in Megiddo to injuries from Jehu (2Ki 9:27)</text:span></text:p><text:p text:style-name="P51"><text:span text:style-name="T80"/></text:p><text:p text:style-name="P51"><text:span text:style-name="T80">All of younger Ahaziah’s elder brothers (sons of Jehoram) were slain before he was made king (2Ch 22:1). Elder Ahaziah was his step brother (2Ki 8:27) and survived until Jehu found him hiding in Samaria after the battle with the Syrians (2Ch 22:9).</text:span></text:p><draw:enhanced-geometry svg:viewBox="0 0 21600 21600" draw:mirror-horizontal="false" draw:mirror-vertical="false" draw:type="rectangle" draw:enhanced-path="M 0 0 L 21600 0 21600 21600 0 21600 0 0 Z N"/></draw:custom-shape><draw:custom-shape draw:style-name="gr36" draw:text-style-name="P52" xml:id="id9" draw:id="id9" svg:width="1.7114in" svg:height="1.3543in" svg:x="6.0894in" svg:y="6.2846in"><text:p text:style-name="P51"><text:span text:style-name="T80">Brother in law to Jehoram (2Ch 21:4,13, 2Ch 22:9)</text:span></text:p><text:p text:style-name="P51"><text:span text:style-name="T80">Uncle in law to younger Ahaziah</text:span></text:p><text:p text:style-name="P51"><text:span text:style-name="T80"/></text:p><text:p text:style-name="P51"><text:span text:style-name="T80">2Ki 9:29</text:span></text:p><text:p text:style-name="P51"><text:span text:style-name="T80">2Ch 22:2-5,9</text:span></text:p><text:p text:style-name="P51"><text:span text:style-name="T80">Dies in Samaria/Jezreel by Jehu (2Ki 10)</text:span></text:p><text:p text:style-name="P51"><text:span text:style-name="T80"/></text:p><text:p text:style-name="P51"><text:span text:style-name="T80">If 2Ki 9-10 &amp; 2Ch 22 are in chronological order then the younger Ahaziah died before the elder Ahaziah (meaning also that the elder Ahaziah survived for ~1yr after his reign ended).</text:span></text:p><draw:enhanced-geometry svg:viewBox="0 0 21600 21600" draw:mirror-horizontal="false" draw:mirror-vertical="false" draw:type="rectangle" draw:enhanced-path="M 0 0 L 21600 0 21600 21600 0 21600 0 0 Z N"/></draw:custom-shape><draw:custom-shape draw:style-name="gr36" draw:text-style-name="P52" xml:id="id3" draw:id="id3" svg:width="1.9516in" svg:height="1.0661in" svg:x="5.7909in" svg:y="1.5626in"><text:p text:style-name="P51"><text:span text:style-name="T80">There must be two Athaliahs for several reasons:</text:span></text:p><text:p text:style-name="P51"><text:span text:style-name="T80"/></text:p><text:p text:style-name="P51"><text:span text:style-name="T80">2Ch 22:2 “also”</text:span></text:p><text:p text:style-name="P51"><text:span text:style-name="T79">2Ki 11:1, 2Ch 22:10 </text:span><text:span text:style-name="T80"><text:s/>“son” (singular)</text:span></text:p><text:p text:style-name="P51"><text:span text:style-name="T80"/></text:p><text:p text:style-name="P51"><text:span text:style-name="T80">Additionally, see the notes below on Jehoram slaying all his brethren of Jehoshaphat and all of younger Ahaziahs elder brothers being slain before he was made king.</text:span></text:p><draw:enhanced-geometry svg:viewBox="0 0 21600 21600" draw:mirror-horizontal="false" draw:mirror-vertical="false" draw:type="rectangle" draw:enhanced-path="M 0 0 L 21600 0 21600 21600 0 21600 0 0 Z N"/></draw:custom-shape><draw:custom-shape draw:style-name="gr36" draw:text-style-name="P52" xml:id="id1" draw:id="id1" svg:width="1.913in" svg:height="0.5823in" svg:x="5.0465in" svg:y="5.5374in"><draw:glue-point draw:id="4" svg:x="-1.2858in" svg:y="1.9693in"/><text:p text:style-name="P51"><text:span text:style-name="T80">Jehoram slew all his brethren of Jehoshaphat after he began to reign (2Ch 21:4,13) which means that elder Ahaziah could not have been his brethren of Jehoshaphat but at the same time he is his brother (2Ch 22:9).</text:span></text:p><draw:enhanced-geometry svg:viewBox="0 0 21600 21600" draw:mirror-horizontal="false" draw:mirror-vertical="false" draw:type="rectangle" draw:enhanced-path="M 0 0 L 21600 0 21600 21600 0 21600 0 0 Z N"/></draw:custom-shape><draw:connector draw:style-name="gr37" draw:text-style-name="P53" draw:type="curve" svg:x1="6.0028in" svg:y1="6.1197in" svg:x2="5.3673in" svg:y2="6.9051in" draw:start-shape="id1" draw:start-glue-point="2" draw:end-shape="id2" draw:end-glue-point="1" svg:d="M15247 15544c0 1330-538 1995-1614 1995" svg:viewBox="0 0 1616 1997"><text:p/></draw:connector><draw:line draw:style-name="gr16" draw:text-style-name="P35" svg:x1="2.7004in" svg:y1="7.1039in" svg:x2="4.4961in" svg:y2="7.1039in"><text:p text:style-name="P11"><text:span text:style-name="T72">11th year <text:s text:c="11"/>Age: 42 </text:span></text:p><text:p text:style-name="P11"><text:span text:style-name="T72">2Ki 9:29 <text:s text:c="12"/>2Ch 22:2 <text:s text:c="49"/>6th year</text:span></text:p><text:p text:style-name="P11"><text:span text:style-name="T72"/></text:p><text:p text:style-name="P11"><text:span text:style-name="T72"/></text:p></draw:line><draw:line draw:style-name="gr3" draw:text-style-name="P33" svg:x1="4.6579in" svg:y1="3.3012in" svg:x2="6.1795in" svg:y2="3.3012in"><text:p text:style-name="P5"><text:span text:style-name="T72">33rd year <text:s text:c="23"/>Jehoram is born</text:span></text:p><text:p text:style-name="P5"><text:span text:style-name="T72">Jehoshaphat age: 26</text:span></text:p></draw:line><draw:line draw:style-name="gr17" draw:text-style-name="P54" svg:x1="2.0799in" svg:y1="10.0134in" svg:x2="2.0799in" svg:y2="10.2043in"><text:p text:style-name="P14"><text:span text:style-name="T84">2</text:span></text:p></draw:line><draw:connector draw:style-name="gr38" draw:text-style-name="P53" draw:type="curve" svg:x1="6.7665in" svg:y1="2.6287in" svg:x2="6.8409in" svg:y2="2.902in" draw:start-shape="id3" draw:start-glue-point="2" draw:end-shape="id4" draw:end-glue-point="0" svg:d="M17187 6677c0 519 189 173 189 694" svg:viewBox="0 0 191 695"><text:p/></draw:connector><draw:line draw:style-name="gr17" draw:text-style-name="P54" svg:x1="4.0244in" svg:y1="4.1004in" svg:x2="4.0244in" svg:y2="4.1984in"><text:p text:style-name="P14"><text:span text:style-name="T84">1</text:span></text:p></draw:line><draw:line draw:style-name="gr39" draw:text-style-name="P53" xml:id="id6" draw:id="id6" svg:x1="1.6524in" svg:y1="7.2043in" svg:x2="1.9024in" svg:y2="7.2043in"><text:p/></draw:line><draw:line draw:style-name="gr17" draw:text-style-name="P54" svg:x1="1.2957in" svg:y1="2.8031in" svg:x2="1.2957in" svg:y2="3.1028in"><text:p text:style-name="P14"><text:span text:style-name="T84">3</text:span></text:p></draw:line><draw:line draw:style-name="gr17" draw:text-style-name="P54" svg:x1="3.789in" svg:y1="6.7012in" svg:x2="3.789in" svg:y2="7.1039in"><text:p text:style-name="P14"><text:span text:style-name="T84">4</text:span></text:p></draw:line><draw:line draw:style-name="gr10" draw:text-style-name="P33" svg:x1="2.0697in" svg:y1="0.2035in" svg:x2="3.3425in" svg:y2="0.2035in"><text:p text:style-name="P5"><text:span text:style-name="T72">2nd year 1Ki 15:25</text:span></text:p><text:p text:style-name="P5"><text:span text:style-name="T72"/></text:p></draw:line><draw:line draw:style-name="gr3" draw:text-style-name="P33" svg:x1="4.4311in" svg:y1="4.1004in" svg:x2="5.6713in" svg:y2="4.1004in"><text:p text:style-name="P5"><text:span text:style-name="T72">41st year, dies 2Ch 16:13</text:span></text:p><text:p text:style-name="P5"><text:span text:style-name="T72"/></text:p></draw:line><draw:custom-shape draw:style-name="gr40" draw:text-style-name="P44" svg:width="1.3004in" svg:height="2.2004in" svg:x="1.4291in" svg:y="3.7988in"><text:p text:style-name="P43"><text:span text:style-name="T78">Ahab</text:span></text:p><text:p text:style-name="P43"><text:span text:style-name="T78">22yrs</text:span></text:p><text:p text:style-name="P43"><text:span text:style-name="T85">In Samaria</text:span></text:p><text:p text:style-name="P43"><text:span text:style-name="T78">1Ki 16: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1" draw:text-style-name="P44" svg:width="1.3004in" svg:height="4.0004in" svg:x="3.3594in" svg:y="7.9043in"><text:p text:style-name="P43"><text:span text:style-name="T78">Joash/Jehoash</text:span></text:p><text:p text:style-name="P43"><text:span text:style-name="T78">40yrs</text:span></text:p><text:p text:style-name="P43"><text:span text:style-name="T78">2Ki 12:1</text:span></text:p><text:p text:style-name="P43"><text:span text:style-name="T78">2Ch 24: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2" draw:text-style-name="P44" svg:width="1.3004in" svg:height="2.8004in" svg:x="1.4299in" svg:y="7.2043in"><text:p text:style-name="P43"><text:span text:style-name="T78">Jehu</text:span></text:p><text:p text:style-name="P43"><text:span text:style-name="T78">28yrs</text:span></text:p><text:p text:style-name="P43"><text:span text:style-name="T78">2Ki 10:3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3" draw:text-style-name="P56" svg:width="1.3461in" svg:height="0.2004in" svg:x="0.7728in" svg:y="5.9043in"><text:p text:style-name="P55"><text:span text:style-name="T73">Ahaziah 2yrs 1Ki 22:5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4" draw:text-style-name="P44" svg:width="1.3004in" svg:height="4.1004in" svg:x="3.3583in" svg:y="0.0008in"><text:p text:style-name="P43"><text:span text:style-name="T78">Asa</text:span></text:p><text:p text:style-name="P43"><text:span text:style-name="T78">41yrs</text:span></text:p><text:p text:style-name="P43"><text:span text:style-name="T78">1Ki 15:10</text:span></text:p><text:p text:style-name="P43"><text:span text:style-name="T78">Mat 1:7,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5" draw:text-style-name="P44" svg:width="1.3004in" svg:height="2.4004in" svg:x="1.4291in" svg:y="0.2988in"><text:p text:style-name="P43"><text:span text:style-name="T78">Baasha</text:span></text:p><text:p text:style-name="P43"><text:span text:style-name="T78">son of Ahijah</text:span></text:p><text:p text:style-name="P43"><text:span text:style-name="T78">24yrs</text:span></text:p><text:p text:style-name="P43"><text:span text:style-name="T78">in Tirzah</text:span></text:p><text:p text:style-name="P43"><text:span text:style-name="T78">1Ki 15:3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6" draw:text-style-name="P57" svg:width="1.5406in" svg:height="0.2004in" svg:x="0.6417in" svg:y="0.2035in"><text:p text:style-name="P49"><text:span text:style-name="T86">Nadab 2yrs 1Ki 15:2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7" draw:text-style-name="P44" svg:width="1.3004in" svg:height="2.5004in" svg:x="3.3583in" svg:y="4.2016in"><text:p text:style-name="P43"><text:span text:style-name="T78">Jehoshaphat/Josaphat</text:span></text:p><text:p text:style-name="P43"><text:span text:style-name="T78">25yrs in Jerusalem</text:span></text:p><text:p text:style-name="P43"><text:span text:style-name="T78">2Ch 20:31</text:span></text:p><text:p text:style-name="P43"><text:span text:style-name="T78">Mat 1: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8" draw:text-style-name="P59" xml:id="id2" draw:id="id2" svg:width="1.3004in" svg:height="0.8004in" svg:x="4.0673in" svg:y="6.5051in"><draw:glue-point draw:id="4" svg:x="1.9685in" svg:y="-0.9823in"/><text:p text:style-name="P58"><text:span text:style-name="T87">Jehoram/Joram</text:span></text:p><text:p text:style-name="P58"><text:span text:style-name="T87">8yrs</text:span></text:p><text:p text:style-name="P58"><text:span text:style-name="T87">2Ki 8:16,17,21 2Ch 21:5, Mat 1: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9" draw:text-style-name="P61" svg:width="1.2398in" svg:height="0.1004in" svg:x="3.3547in" svg:y="7.1043in"><text:p text:style-name="P60"><text:span text:style-name="T72">Ahaziah 1y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50" draw:text-style-name="P61" xml:id="id8" draw:id="id8" svg:width="1.3598in" svg:height="0.1004in" svg:x="3.3547in" svg:y="7.2043in"><text:p text:style-name="P60"><text:span text:style-name="T72">Ahaziah/Jehoahaz/Azariah 1y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1" draw:text-style-name="P53" draw:type="curve" draw:line-skew="0.172in" svg:x1="0.8445in" svg:y1="7.4035in" svg:x2="1.652in" svg:y2="7.2043in" draw:start-shape="id5" draw:start-glue-point="0" draw:end-shape="id6" draw:end-glue-point="3" svg:d="M2145 18805c0-339 683-506 2051-506" svg:viewBox="0 0 2053 508"><text:p/></draw:connector><draw:line draw:style-name="gr16" draw:text-style-name="P35" svg:x1="2.5228in" svg:y1="7.2039in" svg:x2="3.4689in" svg:y2="7.2039in"><text:p text:style-name="P11"><text:span text:style-name="T72"/></text:p><text:p text:style-name="P11"><text:span text:style-name="T72"/></text:p><text:p text:style-name="P11"><text:span text:style-name="T72"><text:s text:c="3"/>12th year <text:s/>Age: 22 <text:s text:c="10"/></text:span></text:p><text:p text:style-name="P11"><text:span text:style-name="T72"><text:s text:c="15"/>2Ki 8:25,26 <text:s text:c="10"/></text:span></text:p></draw:line><draw:line draw:style-name="gr16" draw:text-style-name="P35" svg:x1="2.7299in" svg:y1="6.5055in" svg:x2="4.7272in" svg:y2="6.5055in"><text:p text:style-name="P11"><text:span text:style-name="T72"><text:s text:c="5"/>5th year</text:span></text:p><text:p text:style-name="P11"><text:span text:style-name="T72"><text:s text:c="5"/>2Ki 8:16</text:span></text:p></draw:line><draw:line draw:style-name="gr52" draw:text-style-name="P36" svg:x1="2.7299in" svg:y1="6.7012in" svg:x2="4.0673in" svg:y2="6.7012in"><text:p text:style-name="P14"><text:span text:style-name="T72"/></text:p><text:p text:style-name="P14"><text:span text:style-name="T72"><text:s text:c="9"/>7th year <text:s text:c="20"/>2nd year 2Ki 1:17 <text:s text:c="6"/></text:span></text:p></draw:line><draw:connector draw:style-name="gr53" draw:text-style-name="P34" draw:type="curve" svg:x1="5.4319in" svg:y1="7.7098in" svg:x2="4.7146in" svg:y2="7.2543in" draw:start-shape="id7" draw:start-glue-point="4" draw:end-shape="id8" draw:end-glue-point="1" svg:d="M13797 19583c0-773-607-1157-1822-1157" svg:viewBox="0 0 1824 1159"><text:p/></draw:connector><draw:connector draw:style-name="gr53" draw:text-style-name="P34" draw:type="curve" svg:x1="6.0898in" svg:y1="6.9618in" svg:x2="4.6in" svg:y2="7.1547in" draw:start-shape="id9" draw:start-glue-point="3" svg:d="M15468 17683c-3212 0-1322 490-3784 490" svg:viewBox="0 0 3785 492"><text:p/></draw:connector><draw:custom-shape draw:style-name="gr54" draw:text-style-name="P62" svg:width="1.3004in" svg:height="1.2004in" svg:x="0.8118in" svg:y="3.1028in"><text:p text:style-name="P41"><text:span text:style-name="T76">Omri</text:span></text:p><text:p text:style-name="P41"><text:span text:style-name="T76">12yrs</text:span></text:p><text:p text:style-name="P41"><text:span text:style-name="T77">6yrs in Tirzah</text:span></text:p><text:p text:style-name="P41"><text:span text:style-name="T77">Built the city Samaria</text:span></text:p><text:p text:style-name="P41"><text:span text:style-name="T76">1Ki 16:2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55" draw:text-style-name="P57" svg:width="1.0803in" svg:height="0.1004in" svg:x="0.2311in" svg:y="3.1028in"><text:p text:style-name="P49"><text:span text:style-name="T83">Tibni ??yrs 1Ki 16:21,2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33" svg:x1="2.5386in" svg:y1="0.2992in" svg:x2="3.3472in" svg:y2="0.2992in"><text:p text:style-name="P5"><text:span text:style-name="T72"/></text:p><text:p text:style-name="P5"><text:span text:style-name="T72"/></text:p><text:p text:style-name="P5"><text:span text:style-name="T72"/></text:p><text:p text:style-name="P5"><text:span text:style-name="T72"/></text:p><text:p text:style-name="P5"><text:span text:style-name="T72">3rd year</text:span></text:p><text:p text:style-name="P5"><text:span text:style-name="T72">1Ki 15:28,33</text:span></text:p><text:p text:style-name="P5"><text:span text:style-name="T72"><text:s text:c="82"/>Baasha kills</text:span></text:p><text:p text:style-name="P5"><text:span text:style-name="T72">Nadab</text:span></text:p></draw:line><draw:connector draw:style-name="gr56" draw:text-style-name="P53" draw:type="curve" draw:line-skew="-0.4638in" svg:x1="1.2539in" svg:y1="2.2244in" svg:x2="2.7295in" svg:y2="3.4882in" draw:start-shape="id10" draw:start-glue-point="1" draw:end-shape="id11" draw:end-glue-point="4" svg:d="M3185 5650c1042 0-831 3210 3748 3210" svg:viewBox="0 0 3750 3212"><text:p/></draw:connector><draw:line draw:style-name="gr57" draw:text-style-name="P54" svg:x1="3.9339in" svg:y1="6.5004in" svg:x2="3.9339in" svg:y2="7.0992in"><text:p text:style-name="P14"><text:span text:style-name="T84"><text:s text:c="8"/>6</text:span></text:p></draw:lin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5" table:style-name="Table5">
        <table:table-column table:style-name="Table5.A"/>
        <text:soft-page-break/>
        <table:table-row>
          <table:table-cell table:style-name="Table5.A1" office:value-type="string">
            <text:p text:style-name="P19"><text:span text:style-name="T18">2 Chronicles 21:1-2<text:line-break/></text:span><text:span text:style-name="T17">1</text:span> Now Jehoshaphat slept with his fathers, and was buried with his fathers in the city of David. And Jehoram his son reigned in his stead.</text:p>
            <text:p text:style-name="P19"><text:span text:style-name="T17">2</text:span> And he had brethren <text:span text:style-name="T20">the sons of Jehoshaphat</text:span>, <text:span text:style-name="T88">Azariah</text:span>, and Jehiel, and Zechariah, and <text:span text:style-name="T88">Azariah</text:span>, and Michael, and Shephatiah: all these were the sons of Jehoshaphat king of Israel.</text:p>
          </table:table-cell>
        </table:table-row>
        <table:table-row>
          <table:table-cell table:style-name="Table5.A2" office:value-type="string">
            <text:p text:style-name="P63">2 Chronicles 21:4</text:p>
            <text:p text:style-name="P64">Now when <text:span text:style-name="T89">Jehoram</text:span> was risen up to the kingdom of his father <text:span text:style-name="T90">[</text:span><text:span text:style-name="T91">Jehoshaphat</text:span><text:span text:style-name="T90">]</text:span>, he strengthened himself, and <text:span text:style-name="T20">slew </text:span><text:span text:style-name="T92">all</text:span><text:span text:style-name="T20"> his brethren</text:span> with the sword, and divers also of the princes of Israel.</text:p>
          </table:table-cell>
        </table:table-row>
        <table:table-row>
          <table:table-cell table:style-name="Table5.A2" office:value-type="string">
            <text:p text:style-name="P65">2 Chronicles 21:13</text:p>
            <text:p text:style-name="P66">But hast walked in the way of the kings of Israel, and hast made Judah and the inhabitants of Jerusalem to go a whoring, like to the whoredoms of the house of Ahab, and also hast <text:span text:style-name="T20">slain thy brethren of thy father's house</text:span>, which were better than thyself:</text:p>
          </table:table-cell>
        </table:table-row>
      </table:table>
      <text:list text:style-name="L4">
        <text:list-item>
          <text:p text:style-name="P67">One of the many conditions that must be met is that Jehoram king of Judah killed <text:span text:style-name="T58">all</text:span> of his brethren of <text:span text:style-name="T93">his father’s house</text:span><text:span text:style-name="T94"> (Jehoshaphat) </text:span><text:span text:style-name="T95">sometime after his reign began</text:span><text:span text:style-name="T94">.</text:span></text:p>
          <text:list>
            <text:list-item>
              <text:p text:style-name="P68"><text:span text:style-name="T96">One </text:span>Ahaziah began to reign in the 6<text:span text:style-name="T17">th</text:span> year of Jehoram king of Judah and the <text:span text:style-name="T96">other </text:span>began to reign one year later. <text:span text:style-name="T97">Jehoram’s reign was only 8 years long.</text:span></text:p>
            </text:list-item>
          </text:list>
        </text:list-item>
        <text:list-item>
          <text:p text:style-name="P69">And because of that we know that <text:span text:style-name="T98">very likely</text:span> <text:span text:style-name="T99">neither</text:span><text:span text:style-name="T100"> Ahaziah can be Jehoram’s brethren of Jehoshaphat </text:span><text:span text:style-name="T101">(but one of them is the brother of Jehoram </text:span><text:span text:style-name="T102">2Ch 22:9</text:span><text:span text:style-name="T101">).</text:span></text:p>
        </text:list-item>
        <text:list-item>
          <text:p text:style-name="P70"><text:span text:style-name="T103">W</text:span>e know that both Ahaziah’s <text:span text:style-name="T104">(that were kings of Judah) </text:span>died at the hand of Jehu <text:span text:style-name="T103">(</text:span><text:span text:style-name="T105">2Ki 9</text:span><text:span text:style-name="T103">, </text:span><text:span text:style-name="T105">2Ch 22</text:span><text:span text:style-name="T103">).</text:span></text:p>
        </text:list-item>
      </text:list>
      <text:p text:style-name="P71"/>
      <text:p text:style-name="P71"/>
      <table:table table:name="Table6" table:style-name="Table6">
        <table:table-column table:style-name="Table6.A"/>
        <table:table-row>
          <table:table-cell table:style-name="Table6.A1" office:value-type="string">
            <text:p text:style-name="P19"><text:span text:style-name="T18">2 Chronicles 21:16-17</text:span><text:line-break/><text:span text:style-name="T19">16</text:span> Moreover the LORD stirred up against <text:span text:style-name="T20">Jehoram</text:span> the spirit of the Philistines, and of the Arabians, that <text:span text:style-name="T22">were</text:span> near the Ethiopians:</text:p>
            <text:p text:style-name="P19"><text:span text:style-name="T19">17</text:span> And they came up into Judah, and brake into it, and carried away all the substance that was found in the king's house, and his sons also, and his wives; so that there was never a son left him, save <text:span text:style-name="T20">Jehoahaz, the youngest of his sons</text:span>.</text:p>
          </table:table-cell>
        </table:table-row>
        <table:table-row table:style-name="Table6.2">
          <table:table-cell table:style-name="Table6.A2" office:value-type="string">
            <text:p text:style-name="P72">2 Chronicles 22:1</text:p>
            <text:p text:style-name="P73">And the inhabitants of Jerusalem made <text:span text:style-name="T20">Ahaziah his youngest son</text:span> king in his stead: for the band of men that came with the Arabians to the camp had slain all the eldest. So Ahaziah the son of Jehoram king of Judah reigned.</text:p>
          </table:table-cell>
        </table:table-row>
      </table:table>
      <text:list text:style-name="L5">
        <text:list-item>
          <text:p text:style-name="P74">One of the Ahaziah’s is Jehoram’s only surviving, youngest son <text:span text:style-name="T106">(who is also known as Jehoahaz).</text:span></text:p>
        </text:list-item>
        <text:list-item>
          <text:p text:style-name="P74">So, where did the other Ahaziah come from?</text:p>
        </text:list-item>
      </text:list>
      <text:p text:style-name="P71"/>
      <text:p text:style-name="P71"/>
      <text:p text:style-name="P75">One <text:span text:style-name="T107">crucial </text:span>detail that is really hard to notice without <text:span text:style-name="T108">calculating</text:span> their ages and reign lengths is that one of the Ahaziah’s (the one that we’ll refer to as “the elder Ahaziah” because he was 11 years older than the <text:span text:style-name="T109">younger</text:span> Ahaziah) <text:span text:style-name="T110">is 6 years </text:span><text:span text:style-name="T111">older</text:span><text:span text:style-name="T110"> than Jehoram son of Jehoshaphat. </text:span><text:span text:style-name="T112">And because of that we know that the elder Ahaziah </text:span><text:span text:style-name="T113">can not be </text:span><text:span text:style-name="T112">the </text:span><text:span text:style-name="T114">birth </text:span><text:span text:style-name="T112">son of Jehoram king of Judah. </text:span><text:span text:style-name="T115">Another way</text:span><text:span text:style-name="T112"> to discern between the two Ahaziah’s is that the elder </text:span><text:span text:style-name="T115">Ahaziah</text:span><text:span text:style-name="T112"> is never called Ahaziah son of Jehoram </text:span><text:span text:style-name="T115">but he is called the son of Jehoshaphat (</text:span><text:span text:style-name="T116">2Ch 22:9</text:span><text:span text:style-name="T115">).</text:span></text:p>
      <text:p text:style-name="P75"/>
      <text:p text:style-name="P76">Now, included in all the verses that need to be reviewed on the chart, there is <text:span text:style-name="T117">another</text:span> detail that I want to point out: <text:span text:style-name="T118">r</text:span>emember earlier when we saw that (queen) Athaliah referred to her (singular) son? <text:span text:style-name="T119">That </text:span><text:span text:style-name="T120">hints to</text:span><text:span text:style-name="T119"> us that only one of the Ahaziah’s was the son of Athaliah, </text:span><text:span text:style-name="T121">otherwise it might have been written “her son</text:span><text:span text:style-name="T122">s</text:span><text:span text:style-name="T121">”</text:span><text:span text:style-name="T119">. </text:span><text:span text:style-name="T123">So</text:span><text:span text:style-name="T119">, what </text:span><text:span text:style-name="T124">then </text:span><text:span text:style-name="T119">about </text:span><text:span text:style-name="T125">the following</text:span><text:span text:style-name="T119"> verses </text:span><text:span text:style-name="T123">that tell us that </text:span><text:span text:style-name="T126">both</text:span><text:span text:style-name="T123"> Ahaziah’s were the sons of Athaliah?</text:span></text:p>
      <text:p text:style-name="P76"/>
      <text:p text:style-name="P76"/>
      <table:table table:name="Table7" table:style-name="Table7">
        <table:table-column table:style-name="Table7.A"/>
        <table:table-row>
          <table:table-cell table:style-name="Table7.A1" office:value-type="string">
            <text:p text:style-name="P77">2 Kings 8:18,<text:span text:style-name="T127">26</text:span></text:p>
            <text:p text:style-name="P78"><text:span text:style-name="T128">18</text:span><text:span text:style-name="T127"> </text:span>And he walked in the way of the kings of Israel, as did the house of Ahab: for <text:span text:style-name="T129">the daughter of Ahab</text:span><text:span text:style-name="T20"> was his wife</text:span>: and he did evil in the sight of the LORD.</text:p>
            <text:p text:style-name="P78"><text:span text:style-name="T17">26</text:span> Two and twenty years old was Ahaziah when he began to reign; and he reigned one year in Jerusalem. And <text:span text:style-name="T20">his mother's name was Athaliah, the daughter of Omri king of Israel</text:span>.</text:p>
          </table:table-cell>
        </table:table-row>
        <table:table-row>
          <table:table-cell table:style-name="Table7.A2" office:value-type="string">
            <text:p text:style-name="P19"><text:span text:style-name="T18">2 Chronicles 22:2-3</text:span><text:line-break/><text:span text:style-name="T19">2</text:span> Forty and two years old <text:span text:style-name="T22">was</text:span> Ahaziah when he began to reign, and he reigned one year in Jerusalem. <text:span text:style-name="T20">His mother's name </text:span><text:span text:style-name="T129">also</text:span><text:span text:style-name="T20"> </text:span><text:span text:style-name="T21">was</text:span><text:span text:style-name="T20"> Athaliah the daughter of Omri</text:span>.</text:p>
            <text:p text:style-name="P19"><text:span text:style-name="T19">3</text:span> He <text:span text:style-name="T129">also</text:span> walked in the ways of the house of Ahab: for his mother was his counsellor to do wickedly.</text:p>
          </table:table-cell>
        </table:table-row>
      </table:table>
      <text:list text:style-name="L6">
        <text:list-item>
          <text:p text:style-name="P79"><text:span text:style-name="T130">T</text:span>ake notice<text:span text:style-name="T130"> </text:span>to the words “also” in <text:span text:style-name="T18">2Ch 22:2,3</text:span>. Those verses are <text:span text:style-name="T131">clearly </text:span>referring to the elder Ahaziah and they tell us that “his mother’s name <text:span text:style-name="T58">also</text:span> was Athaliah”.</text:p>
        </text:list-item>
        <text:list-item>
          <text:p text:style-name="P80"><text:span text:style-name="T132">O</text:span>nly one Athaliah is referred to as the daughter of Ahab. The other <text:span text:style-name="T133">Athaliah </text:span>is only ever called “the daughter of Omri” (Ahab’s father).</text:p>
        </text:list-item>
        <text:list-item>
          <text:p text:style-name="P81">And so it <text:span text:style-name="T134">becomes</text:span> not too far fetched to <text:span text:style-name="T93">guess</text:span> that the second Athaliah was the aunt of <text:span text:style-name="T135">the </text:span>Athaliah who would become queen of Judah for a short time <text:span text:style-name="T135">(because she could have been the sister to Ahab).</text:span></text:p>
        </text:list-item>
      </text:list>
      <text:p text:style-name="P82"/>
      <text:p text:style-name="P82"><text:soft-page-break/>Want to take a wild guess who was the husband of this second Athaliah? <text:span text:style-name="T136">Keep in mind that the elder Ahaziah is referred to as the “son of Jehoshaphat” (</text:span><text:span text:style-name="T137">2Ch 22:9</text:span><text:span text:style-name="T136">).</text:span></text:p>
      <text:p text:style-name="P82"/>
      <text:p text:style-name="P83"><text:span text:style-name="T138">Remember the large feast that Ahab held for Jehoshaphat </text:span><text:span text:style-name="T139">that </text:span><text:span text:style-name="T140">seems very likely was a marriage feast</text:span><text:span text:style-name="T139"> </text:span><text:span text:style-name="T141">in </text:span><text:span text:style-name="T142">2Ch 18:1-2</text:span>?</text:p>
      <text:p text:style-name="P82"/>
      <text:p text:style-name="P84"><text:span text:style-name="T143">Remember God’s promise</text:span><text:span text:style-name="T144">(s)</text:span><text:span text:style-name="T143"> to David in </text:span><text:span text:style-name="T145">2Sa 7</text:span><text:span text:style-name="T143"> &amp; </text:span><text:span text:style-name="T145">1Ch 17</text:span><text:span text:style-name="T143">?</text:span></text:p>
      <text:p text:style-name="P84"/>
      <text:p text:style-name="Text_20_body"><text:span text:style-name="T146">Special note: a co-regency does not equate to reigning on the throne of David </text:span><text:span text:style-name="T147">and both Ahaziah’s reigned co-regent with Jehoram</text:span><text:span text:style-name="T146">. You’ll have to study </text:span><text:span text:style-name="T147">about the</text:span><text:span text:style-name="T146"> two Jehoiachims (below, after this one) to </text:span><text:span text:style-name="T147">see that. In the 4</text:span><text:span text:style-name="T148">th</text:span><text:span text:style-name="T147"> year of Eliakim/Jehoiakim’s reign God declared that [Jehoiakim]</text:span> “shall have none to sit upon the throne of David“ <text:span text:style-name="T149">(both </text:span><text:span text:style-name="T150">of his sons named </text:span><text:span text:style-name="T149">Jehoiachin reigned co-regent with Jehoiakim).</text:span></text:p>
      <text:p text:style-name="P85"/>
      <text:p text:style-name="P86"><text:span text:style-name="T151">While the</text:span><text:span text:style-name="T152"> Bible </text:span><text:span text:style-name="T153">does not</text:span><text:span text:style-name="T152"> explicitly tell us that Jehoshaphat </text:span><text:span text:style-name="T151">married the other Athaliah</text:span><text:span text:style-name="T152"> </text:span><text:span text:style-name="T151">when we put all the pieces together that we </text:span><text:span text:style-name="T150">are given </text:span><text:span text:style-name="T151">- </text:span><text:span text:style-name="T154">what other possibilities exist?</text:span></text:p>
      <text:p text:style-name="P86"/>
      <text:p text:style-name="P87">Here’s what we have:</text:p>
      <text:list text:style-name="L7">
        <text:list-item>
          <text:p text:style-name="P88">2 Ahaziahs</text:p>
          <text:list>
            <text:list-item>
              <text:p text:style-name="P88">The elder is <text:span text:style-name="T155">called </text:span>a son of Jehoshaphat <text:span text:style-name="T156">(</text:span><text:span text:style-name="T157">2Ch 22:9</text:span><text:span text:style-name="T156">).</text:span></text:p>
              <text:list>
                <text:list-item>
                  <text:p text:style-name="P89">Jehoram slew all his brethren of Jehoshaphat (<text:span text:style-name="T18">2Ch 21:4,13</text:span>) <text:span text:style-name="T158">so </text:span><text:span text:style-name="T159">this Ahaziah</text:span><text:span text:style-name="T158"> had to be a brother in law.</text:span></text:p>
                </text:list-item>
              </text:list>
            </text:list-item>
            <text:list-item>
              <text:p text:style-name="P88">The younger is <text:span text:style-name="T160">called the son of Jehoram </text:span><text:span text:style-name="T159">(</text:span><text:span text:style-name="T161">2Ki 8:25</text:span><text:span text:style-name="T159">).</text:span></text:p>
              <text:list>
                <text:list-item>
                  <text:p text:style-name="P90"><text:span text:style-name="T162">We’re explicitly told that he was </text:span><text:span text:style-name="T163">a son</text:span> in law<text:span text:style-name="T164"> </text:span>to Jehoram <text:span text:style-name="T164">(</text:span><text:span text:style-name="T165">2Ki 8:27</text:span><text:span text:style-name="T164">)</text:span>.</text:p>
                </text:list-item>
                <text:list-item>
                  <text:p text:style-name="P91">All of younger Ahaziah’s elder brothers <text:span text:style-name="T160">of Jehoram </text:span>were slain before he was made king (<text:span text:style-name="T166">21:17</text:span><text:span text:style-name="T160">,</text:span><text:span text:style-name="T18"> 22:1</text:span>) <text:span text:style-name="T167">confirming that he is a son in law </text:span><text:span text:style-name="T168">to Jehoram.</text:span></text:p>
                </text:list-item>
              </text:list>
            </text:list-item>
          </text:list>
        </text:list-item>
        <text:list-item>
          <text:p text:style-name="P88">2 Athaliahs</text:p>
          <text:list>
            <text:list-item>
              <text:p text:style-name="P88">One is the mother of the elder Ahaziah (she did not become queen <text:span text:style-name="T169">that we know of</text:span>).</text:p>
              <text:list>
                <text:list-item>
                  <text:p text:style-name="P92">She is called the daughter of Omri.</text:p>
                </text:list-item>
              </text:list>
            </text:list-item>
            <text:list-item>
              <text:p text:style-name="P88">One is the mother of the younger Ahaziah and was queen for ~6 years.</text:p>
              <text:list>
                <text:list-item>
                  <text:p text:style-name="P92">She is called the daughter of Ahab.</text:p>
                </text:list-item>
              </text:list>
            </text:list-item>
          </text:list>
        </text:list-item>
      </text:list>
      <text:p text:style-name="P86"/>
      <text:p text:style-name="P93">From what I can tell, in order for all of these to be true, Jehoshaphat would have to have been married to the “other” Athaliah (likely elder; the one that was not queen that we know of). <text:span text:style-name="T170">If you can think of any other possibilities let me know please!</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4"><text:soft-page-break/><text:span text:style-name="T171">How was </text:span><text:span text:style-name="T172">Jehoiachin both age 8 and age 18 when he began to reign?</text:span></text:p>
      <text:p text:style-name="Standard"/>
      <text:p text:style-name="Standard"/>
      <table:table table:name="Table8" table:style-name="Table8">
        <table:table-column table:style-name="Table8.A"/>
        <table:table-row>
          <table:table-cell table:style-name="Table8.A1" office:value-type="string">
            <text:p text:style-name="P95">2 Kings 24:6,<text:span text:style-name="T173">8</text:span></text:p>
            <text:p text:style-name="P29"><text:span text:style-name="T174">6</text:span><text:span text:style-name="T173"> </text:span>So <text:span text:style-name="T175">Jehoiakim</text:span> slept with his fathers: and <text:span text:style-name="T20">Jehoiachin his son reigned in his stead</text:span>.</text:p>
            <text:p text:style-name="P29"><text:span text:style-name="T17">8 </text:span><text:span text:style-name="T20">Jehoiachin was eighteen years old when he began to reign</text:span>, and <text:span text:style-name="T175">he reigned in Jerusalem three months</text:span>. And his mother's name was Nehushta, the daughter of Elnathan of Jerusalem.</text:p>
          </table:table-cell>
        </table:table-row>
        <table:table-row>
          <table:table-cell table:style-name="Table8.A2" office:value-type="string">
            <text:p text:style-name="P96">2 Chronicles 36:8,<text:span text:style-name="T176">9</text:span></text:p>
            <text:p text:style-name="P29"><text:span text:style-name="T177">8</text:span><text:span text:style-name="T176"> </text:span>Now the rest of the acts of <text:span text:style-name="T175">Jehoiakim</text:span>, and his abominations which he did, and that which was found in him, behold, they are written in the book of the kings of Israel and Judah: and <text:span text:style-name="T20">Jehoiachin his son reigned in his stead</text:span>.</text:p>
            <text:p text:style-name="P97"><text:span text:style-name="T177">9</text:span><text:span text:style-name="T176"> </text:span><text:span text:style-name="T20">Jehoiachin was eight years old when he began to reign</text:span>, and <text:span text:style-name="T175">he reigned three months and ten days</text:span> in Jerusalem: and he did that which was evil in the sight of the LORD.</text:p>
          </table:table-cell>
        </table:table-row>
      </table:table>
      <text:list text:style-name="L8">
        <text:list-item>
          <text:p text:style-name="P98"><text:span text:style-name="T178">N</text:span>ormally it’s not possible <text:span text:style-name="T179">for </text:span>a man to be two different ages when he began to reign <text:span text:style-name="T178">so</text:span><text:span text:style-name="T180"> immediately we know that these verses are </text:span><text:span text:style-name="T181">not both about one man but are instead </text:span><text:span text:style-name="T180">about two different men with the same name.</text:span></text:p>
        </text:list-item>
        <text:list-item>
          <text:p text:style-name="P99">Another clue that God gave us <text:span text:style-name="T182">that there are two different men with the same name </text:span><text:span text:style-name="T183">is in the length of their reigns</text:span>.</text:p>
          <text:list>
            <text:list-item>
              <text:p text:style-name="P100"><text:span text:style-name="T184">One </text:span><text:span text:style-name="T185">either </text:span><text:span text:style-name="T184">lasted 10 days longer than the other </text:span><text:span text:style-name="T185">or was made king 10 days before the other</text:span><text:span text:style-name="T184">.</text:span></text:p>
            </text:list-item>
          </text:list>
        </text:list-item>
      </text:list>
      <text:p text:style-name="P101"/>
      <text:p text:style-name="P101"/>
      <table:table table:name="Table9" table:style-name="Table9">
        <table:table-column table:style-name="Table9.A"/>
        <table:table-row>
          <table:table-cell table:style-name="Table9.A1" office:value-type="string">
            <text:p text:style-name="P19"><text:span text:style-name="T18">Jeremiah 36:29-30</text:span><text:line-break/><text:span text:style-name="T19">29</text:span> And thou shalt say to <text:span text:style-name="T175">Jehoiakim king of Judah</text:span>, Thus saith the LORD; Thou hast burned this roll, saying, Why hast thou written therein, saying, The king of Babylon shall certainly come and destroy this land, and shall cause to cease from thence man and beast?</text:p>
            <text:p text:style-name="P19"><text:span text:style-name="T19">30</text:span> Therefore thus saith the LORD <text:span text:style-name="T175">of Jehoiakim king of Judah</text:span>; <text:span text:style-name="T175">He shall have none to sit upon the throne of David</text:span>: and his dead body shall be cast out in the day to the heat, and in the night to the frost.</text:p>
          </table:table-cell>
        </table:table-row>
      </table:table>
      <text:list text:style-name="L9">
        <text:list-item>
          <text:p text:style-name="P102">In the 4<text:span text:style-name="T17">th</text:span> year of Jehoiakim king of Judah’s reign he receives a letter from the prophet Jeremiah.</text:p>
        </text:list-item>
        <text:list-item>
          <text:p text:style-name="P103">After throwing the letter into a fire, God pronounces a judgment against Jehoiakim that none of his seed will sit upon the throne of David.</text:p>
        </text:list-item>
        <text:list-item>
          <text:p text:style-name="P104">Now that presents <text:span text:style-name="T186">an</text:span> interesting <text:span text:style-name="T187">scenario</text:span> because we were told in <text:span text:style-name="T18">2Ki 24:6</text:span> and <text:span text:style-name="T18">2Ch 36:8</text:span> that both Jehoiachin’s reigned in their father’s stead.</text:p>
          <text:list>
            <text:list-item>
              <text:p text:style-name="P105">Additionally, in <text:span text:style-name="T18">2Ki 24:12,15</text:span>, <text:span text:style-name="T18">25:27</text:span>, <text:span text:style-name="T18">Jer 52:31</text:span>, and <text:span text:style-name="T18">Eze 1:2</text:span> <text:span text:style-name="T188">a </text:span>Jehoiachin is referred to as the king of Judah.</text:p>
            </text:list-item>
          </text:list>
        </text:list-item>
        <text:list-item>
          <text:p text:style-name="P106">So <text:span text:style-name="T189">then moving forward </text:span>we need to think about scenarios where both are true.</text:p>
        </text:list-item>
        <text:list-item>
          <text:p text:style-name="P107">First, we need to know that when the Bible says “<text:span text:style-name="T190">such-and-such</text:span> reigned in <text:span text:style-name="T190">such-and-such’s</text:span> stead” it does not necessarily mean that one king followed successively right after another. <text:span text:style-name="T191">You may need to pause here to go and learn that for yourself before you continue </text:span><text:span text:style-name="T192">because it’s crucial for understanding how both Jehoiachin’s were kings but they also did not sit on the throne of David.</text:span></text:p>
          <text:list>
            <text:list-item>
              <text:p text:style-name="P108">This can most easily be seen by charting the reigns of all the kings of Judah &amp; Israel and lining them up relative to each other <text:span text:style-name="T193">and comparing that to when we see the phrase “</text:span><text:span text:style-name="T190">such-and-such</text:span><text:span text:style-name="T194"> reigned in </text:span><text:span text:style-name="T190">such-and-such’s</text:span><text:span text:style-name="T194"> stead”.</text:span></text:p>
            </text:list-item>
            <text:list-item>
              <text:p text:style-name="P109">Note that this <text:span text:style-name="T195">and many other details are </text:span>very easy to miss by just reading along. Here are a few examples.</text:p>
              <text:list>
                <text:list-item>
                  <text:p text:style-name="P110"><text:span text:style-name="T196">8 years of co-regency between </text:span><text:span text:style-name="T197">Ahaz &amp; Hezekiah </text:span><text:span text:style-name="T198">kings of Judah.</text:span></text:p>
                </text:list-item>
                <text:list-item>
                  <text:p text:style-name="P110"><text:span text:style-name="T199">13 year gap between </text:span><text:span text:style-name="T197">Amaziah and Azariah/Uzziah </text:span><text:span text:style-name="T198">kings of Judah.</text:span></text:p>
                </text:list-item>
                <text:list-item>
                  <text:p text:style-name="P111"><text:span text:style-name="T200">Omri </text:span><text:span text:style-name="T201">king </text:span><text:span text:style-name="T200">of Israel was </text:span><text:span text:style-name="T202">made</text:span><text:span text:style-name="T200"> king </text:span><text:span text:style-name="T203">by the people </text:span><text:span text:style-name="T200">before Zimri died </text:span><text:span text:style-name="T204">which was ~4 years before his reign actually began </text:span><text:span text:style-name="T200">(</text:span><text:span text:style-name="T205">1Ki 16:16</text:span>, <text:span text:style-name="T205">1Ki 16:23</text:span><text:span text:style-name="T200">).</text:span></text:p>
                </text:list-item>
              </text:list>
            </text:list-item>
          </text:list>
        </text:list-item>
        <text:list-item>
          <text:p text:style-name="P112">Another possible scenario is that both Jehoiachins were not Jehoiakim’s birth sons <text:span text:style-name="T206">(much like Ahaz and Hezekiah) </text:span><text:span text:style-name="T207">but I haven’t found </text:span><text:span text:style-name="T208">any</text:span><text:span text:style-name="T207"> scripture to support that scenario.</text:span></text:p>
        </text:list-item>
      </text:list>
      <text:p text:style-name="P113"/>
      <text:p text:style-name="P113"/>
      <table:table table:name="Table11" table:style-name="Table11">
        <table:table-column table:style-name="Table11.A"/>
        <table:table-row>
          <table:table-cell table:style-name="Table11.A1" office:value-type="string">
            <text:p text:style-name="P114">2 Kings 24:6</text:p>
            <text:p text:style-name="P115">So <text:span text:style-name="T20">Jehoiakim</text:span> slept with his fathers: and <text:span text:style-name="T20">Jehoiachin his son reigned in his stead</text:span>.</text:p>
          </table:table-cell>
        </table:table-row>
        <table:table-row>
          <table:table-cell table:style-name="Table11.A2" office:value-type="string">
            <text:p text:style-name="P19"><text:span text:style-name="T18">2 Chronicles 36:5-6</text:span><text:line-break/><text:span text:style-name="T19">5</text:span> <text:span text:style-name="T20">Jehoiakim</text:span> <text:span text:style-name="T22">was</text:span> twenty and five years old when he began to reign, and he reigned eleven years in Jerusalem: and he did <text:span text:style-name="T22">that which was</text:span> evil in the sight of the LORD his God.</text:p>
            <text:p text:style-name="P19"><text:span text:style-name="T19">6</text:span> Against <text:span text:style-name="T20">him</text:span> came up Nebuchadnezzar king of Babylon, and <text:span text:style-name="T20">bound him in fetters, to carry him to Babylon</text:span>.</text:p>
          </table:table-cell>
        </table:table-row>
      </table:table>
      <text:list text:style-name="L10">
        <text:list-item>
          <text:p text:style-name="P116">If all we do is look at <text:span text:style-name="T18">2 Kings</text:span>, we might think that Jehoiakim died and then one of his sons reigned <text:span text:style-name="T209">immediately</text:span><text:span text:style-name="T210"> after him</text:span><text:span text:style-name="T93"> </text:span><text:span text:style-name="T211">which </text:span><text:span text:style-name="T212">disagrees with what</text:span><text:span text:style-name="T211"> </text:span><text:span text:style-name="T213">Jer 36:30</text:span><text:span text:style-name="T211"> tells us.</text:span></text:p>
        </text:list-item>
        <text:list-item>
          <text:p text:style-name="P116"><text:span text:style-name="T214">W</text:span>hen we look at <text:span text:style-name="T18">2 Chronicles</text:span>, we learn that before dying Jehoiakim was carried to Babylon.</text:p>
        </text:list-item>
      </text:list>
      <text:p text:style-name="P117"/>
      <text:p text:style-name="P118"/>
      <text:p text:style-name="P118"/>
      <text:p text:style-name="P118"/>
      <text:p text:style-name="P119"><text:soft-page-break/>A to-scale <text:span text:style-name="T215">chart</text:span> of the reigns of Johoiakim &amp; both Jehoiachins</text:p>
      <text:p text:style-name="P118"/>
      <text:p text:style-name="P118"><draw:g text:anchor-type="paragraph" draw:z-index="2" draw:name="Group object 3" draw:style-name="gr1"><draw:connector draw:style-name="gr58" draw:text-style-name="P34" draw:type="curve" svg:x1="1.8551in" svg:y1="1.0217in" svg:x2="1.976in" svg:y2="1.0213in" draw:start-shape="id12" draw:start-glue-point="1" draw:end-shape="id13" draw:end-glue-point="3" svg:d="M4712 2595c230 0 78-1 307-1" svg:viewBox="0 0 309 4"><text:p/></draw:connector><draw:connector draw:style-name="gr58" draw:text-style-name="P34" draw:type="curve" draw:line-skew="0.4571in" svg:x1="4.7827in" svg:y1="4.2035in" svg:x2="4.5252in" svg:y2="2.1957in" draw:start-shape="id14" draw:start-glue-point="1" draw:end-shape="id15" draw:end-glue-point="1" svg:d="M12148 10677c2489 0 2817-5100-654-5100" svg:viewBox="0 0 2566 5101"><text:p/></draw:connector><draw:line draw:style-name="gr59" draw:text-style-name="P120" svg:x1="1.8764in" svg:y1="2.6417in" svg:x2="3.5165in" svg:y2="2.6417in"><text:p text:style-name="P11"><text:span text:style-name="T80"><text:s text:c="4"/>7</text:span><text:span text:style-name="T81">th</text:span><text:span text:style-name="T80"> year <text:s text:c="3"/>2Ch 36:6, Jer 52:28</text:span></text:p><text:p text:style-name="P11"><text:span text:style-name="T80"><text:s/></text:span></text:p></draw:line><draw:line draw:style-name="gr12" draw:text-style-name="P121" svg:x1="5.5094in" svg:y1="2.7173in" svg:x2="5.8295in" svg:y2="2.7173in"><text:p text:style-name="P5"><text:span text:style-name="T216"/></text:p><text:p text:style-name="P5"><text:span text:style-name="T216">Age: 8</text:span></text:p></draw:line><draw:line draw:style-name="gr12" draw:text-style-name="P33" svg:x1="4.1173in" svg:y1="1.6465in" svg:x2="4.9374in" svg:y2="1.6465in"><text:p text:style-name="P5"><text:span text:style-name="T72"/></text:p><text:p text:style-name="P5"><text:span text:style-name="T72">Age: 25</text:span></text:p></draw:line><draw:custom-shape draw:style-name="gr60" draw:text-style-name="P57" xml:id="id15" draw:id="id15" svg:width="1.3004in" svg:height="1.1004in" svg:x="3.2252in" svg:y="1.6457in"><draw:glue-point draw:id="4" svg:x="1.9709in" svg:y="1.4102in"/><text:p text:style-name="P49"><text:span text:style-name="T86">Eliakim/Jehoiakim</text:span></text:p><text:p text:style-name="P49"><text:span text:style-name="T86">11yrs</text:span></text:p><text:p text:style-name="P49"><text:span text:style-name="T86">2Ki 23:34,36</text:span></text:p><text:p text:style-name="P49"><text:span text:style-name="T86">2Ch 36:4,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1" draw:text-style-name="P123" svg:width="1.2504in" svg:height="2.3094in" svg:x="0.6264in" svg:y="1.9465in"><text:p text:style-name="P122"><text:span text:style-name="T217">Nebuchadnezzar</text:span></text:p><text:p text:style-name="P122"><text:span text:style-name="T217">king of Babylon</text:span></text:p><draw:enhanced-geometry svg:viewBox="0 0 21600 21600" draw:type="rectangle" draw:enhanced-path="M 0 0 L 21600 0 21600 21600 0 21600 0 0 Z N"/></draw:custom-shape><draw:line draw:style-name="gr62" draw:text-style-name="P124" svg:x1="1.8764in" svg:y1="2.0417in" svg:x2="3.2217in" svg:y2="2.0417in"><text:p text:style-name="P14"><text:span text:style-name="T218"/></text:p><text:p text:style-name="P14"><text:span text:style-name="T216">1</text:span><text:span text:style-name="T219">st</text:span><text:span text:style-name="T216"> year <text:s text:c="7"/></text:span><text:span text:style-name="T218">Jer 25:1, 36:1, 45:1, 46:2 <text:s text:c="5"/></text:span><text:span text:style-name="T216"><text:s text:c="2"/>4</text:span><text:span text:style-name="T219">th</text:span><text:span text:style-name="T216"> year</text:span></text:p></draw:line><draw:custom-shape draw:style-name="gr63" draw:text-style-name="P126" xml:id="id16" draw:id="id16" svg:width="1.248in" svg:height="0.2925in" svg:x="1.939in" svg:y="3.2421in"><draw:glue-point draw:id="4" svg:x="-1.1756in" svg:y="-1.9657in"/><text:p text:style-name="P125"><text:span text:style-name="T80">Babylonian captivity begins</text:span></text:p><text:p text:style-name="P125"><text:span text:style-name="T220">2Ch 36:9,10, Jer 29:1,2,10</text:span></text:p><draw:enhanced-geometry svg:viewBox="0 0 21600 21600" draw:type="rectangle" draw:enhanced-path="M 0 0 L 21600 0 21600 21600 0 21600 0 0 Z N"/></draw:custom-shape><draw:line draw:style-name="gr64" draw:text-style-name="P120" xml:id="id17" draw:id="id17" svg:x1="1.8768in" svg:y1="2.7472in" svg:x2="3.4366in" svg:y2="2.7472in"><draw:glue-point draw:id="4" svg:x="-0.7571in" svg:y="0in"/><text:p text:style-name="P11"><text:span text:style-name="T80"/></text:p><text:p text:style-name="P11"><text:span text:style-name="T80"><text:s text:c="4"/>8</text:span><text:span text:style-name="T81">th</text:span><text:span text:style-name="T80"> year <text:s text:c="6"/>2Ki 24:12, 2Ch 36:10 </text:span></text:p></draw:line><draw:line draw:style-name="gr12" draw:text-style-name="P127" svg:x1="4.1819in" svg:y1="2.7472in" svg:x2="4.922in" svg:y2="2.7472in"><text:p text:style-name="P5"><text:span text:style-name="T83"/></text:p><text:p text:style-name="P5"><text:span text:style-name="T221">Age: 21 </text:span></text:p></draw:line><draw:custom-shape draw:style-name="gr60" draw:text-style-name="P57" svg:width="1.3004in" svg:height="1.1004in" svg:x="3.2244in" svg:y="2.7465in"><text:p text:style-name="P49"><text:span text:style-name="T86">Mattaniah/Zedekiah</text:span></text:p><text:p text:style-name="P49"><text:span text:style-name="T86">11yrs</text:span></text:p><text:p text:style-name="P49"><text:span text:style-name="T86">2Ki 24:17,18</text:span></text:p><text:p text:style-name="P49"><text:span text:style-name="T86">2Ch 36:10,11</text:span></text:p><text:p text:style-name="P49"><text:span text:style-name="T86">Jer 5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65" draw:text-style-name="P127" svg:x1="4.5244in" svg:y1="3.6417in" svg:x2="6.4244in" svg:y2="3.6417in"><text:p text:style-name="P5"><text:span text:style-name="T83">9</text:span><text:span text:style-name="T222">th</text:span><text:span text:style-name="T83"> year, 10</text:span><text:span text:style-name="T222">th</text:span><text:span text:style-name="T83"> month, 10</text:span><text:span text:style-name="T222">th</text:span><text:span text:style-name="T83"> day</text:span></text:p><text:p text:style-name="P5"><text:span text:style-name="T83"><text:s/>3</text:span><text:span text:style-name="T222">rd</text:span><text:span text:style-name="T83"> Siege of Jerusalem begins 2Ki 25:1, Jer 39:1</text:span></text:p></draw:line><draw:custom-shape draw:style-name="gr66" draw:text-style-name="P129" svg:width="2.4803in" svg:height="0.0205in" svg:x="3.3043in" svg:y="3.8465in"><text:p text:style-name="P128"><text:span text:style-name="T223"/></text:p><text:p text:style-name="P128"><text:span text:style-name="T223"/></text:p><text:p text:style-name="P128"><text:span text:style-name="T223">Gedaliah 2 months in Mizpah of Judah 2Ki 25:1,2,8,22,23,25, Jer 40:6,12</text:span></text:p><draw:enhanced-geometry svg:viewBox="0 0 21600 21600" draw:type="rectangle" draw:enhanced-path="M 0 0 L 21600 0 21600 21600 0 21600 0 0 Z N"/></draw:custom-shape><draw:line draw:style-name="gr59" draw:text-style-name="P130" svg:x1="1.8756in" svg:y1="3.8472in" svg:x2="3.4555in" svg:y2="3.8472in"><text:p text:style-name="P11"><text:span text:style-name="T224"/></text:p><text:p text:style-name="P11"><text:span text:style-name="T225"><text:s text:c="3"/>19</text:span><text:span text:style-name="T226">th</text:span><text:span text:style-name="T225"> year </text:span><text:span text:style-name="T224">2Ki 25:8-22, Nubuzaradan sent <text:s text:c="10"/></text:span></text:p></draw:line><draw:line draw:style-name="gr11" draw:text-style-name="P131" svg:x1="4.5358in" svg:y1="2.0535in" svg:x2="6.576in" svg:y2="2.0535in"><text:p text:style-name="P11"><text:span text:style-name="T83"><text:s text:c="3"/>4</text:span><text:span text:style-name="T222">th</text:span><text:span text:style-name="T83"> year, Burns the letter from Jeremiah</text:span></text:p><text:p text:style-name="P11"><text:span text:style-name="T83">Jer 36 <text:s text:c="64"/></text:span></text:p></draw:line><draw:custom-shape draw:style-name="gr67" draw:text-style-name="P133" svg:width="1.2114in" svg:height="0.9622in" svg:x="6.1972in" svg:y="2.0417in"><text:p text:style-name="P132"><text:span text:style-name="T227">Jeremiah 36:30</text:span></text:p><text:p text:style-name="P132"><text:span text:style-name="T227">Therefore thus saith the LORD of </text:span><text:span text:style-name="T228">Jehoiakim king of Judah; He shall have none to sit upon the throne of David</text:span><text:span text:style-name="T227">: and his dead body shall be cast out in the day to the heat, and in the night to the frost.</text:span></text:p><draw:enhanced-geometry svg:viewBox="0 0 21600 21600" draw:mirror-horizontal="false" draw:mirror-vertical="false" draw:type="rectangle" draw:enhanced-path="M 0 0 L 21600 0 21600 21600 0 21600 0 0 Z N"/></draw:custom-shape><draw:line draw:style-name="gr68" draw:text-style-name="P127" svg:x1="1.8768in" svg:y1="1.9417in" svg:x2="3.222in" svg:y2="1.9417in"><text:p text:style-name="P5"><text:span text:style-name="T83">Dan 1:1, 2Ki 24:1 <text:s text:c="13"/>3</text:span><text:span text:style-name="T222">rd</text:span><text:span text:style-name="T83"> year </text:span></text:p><text:p text:style-name="P5"><text:span text:style-name="T83"/></text:p></draw:line><draw:custom-shape draw:style-name="gr69" draw:text-style-name="P135" xml:id="id13" draw:id="id13" svg:width="1.3476in" svg:height="1.1539in" svg:x="1.9756in" svg:y="0.4449in"><draw:glue-point draw:id="4" svg:x="-1.9685in" svg:y="1.765in"/><text:p text:style-name="P134"><text:span text:style-name="T229">Which Jehoiachin does the name “Coniah” refer to? Definitely the elder.</text:span></text:p><text:p text:style-name="P134"><text:span text:style-name="T229"/></text:p><text:p text:style-name="P134"><text:span text:style-name="T229">Jeremiah 22:28</text:span></text:p><text:p text:style-name="P134"><text:span text:style-name="T229">Is this man Coniah a despised broken idol? is he a vessel wherein is no pleasure? wherefore are they cast out, he and </text:span><text:span text:style-name="T230">his seed</text:span><text:span text:style-name="T229">, and are cast into a land which they know not?</text:span></text:p><draw:enhanced-geometry svg:viewBox="0 0 21600 21600" draw:type="rectangle" draw:enhanced-path="M 0 0 L 21600 0 21600 21600 0 21600 0 0 Z N"/></draw:custom-shape><draw:custom-shape draw:style-name="gr70" draw:text-style-name="P137" svg:width="1.2406in" svg:height="0.0303in" svg:x="4.2874in" svg:y="2.7157in"><draw:glue-point draw:id="4" svg:x="1.8008in" svg:y="-1.9685in"/><text:p text:style-name="P136"><text:span text:style-name="T231">Jehoiachin 3m 10d 2Ki 24:12, 2Ch 36:9,10</text:span></text:p><text:p text:style-name="P136"><text:span text:style-name="T2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59" draw:text-style-name="P138" svg:x1="1.8748in" svg:y1="3.7417in" svg:x2="4.5035in" svg:y2="3.7417in"><text:p text:style-name="P11"><text:span text:style-name="T232"><text:s text:c="3"/>18</text:span><text:span text:style-name="T233">th</text:span><text:span text:style-name="T232"> year <text:s text:c="7"/></text:span><text:span text:style-name="T234">Jer 32:1, 52:29 <text:s text:c="7"/>i</text:span><text:span text:style-name="T223">n the 10</text:span><text:span text:style-name="T235">th</text:span><text:span text:style-name="T223"> year</text:span></text:p><text:p text:style-name="P11"><text:span text:style-name="T232"/></text:p></draw:line><draw:line draw:style-name="gr59" draw:text-style-name="P139" svg:x1="1.8764in" svg:y1="4.25in" svg:x2="2.8165in" svg:y2="4.25in"><text:p text:style-name="P11"><text:span text:style-name="T220"><text:s text:c="3"/>23</text:span><text:span text:style-name="T236">rd</text:span><text:span text:style-name="T220"> year Jer 52:30</text:span></text:p><text:p text:style-name="P11"><text:span text:style-name="T220"/></text:p></draw:line><draw:line draw:style-name="gr4" draw:text-style-name="P140" svg:x1="4.0543in" svg:y1="2.7157in" svg:x2="4.1878in" svg:y2="2.7157in"><text:p text:style-name="P11"><text:span text:style-name="T216"/></text:p><text:p text:style-name="P11"><text:span text:style-name="T216">Age: 18</text:span></text:p></draw:line><draw:line draw:style-name="gr71" draw:text-style-name="P33" svg:x1="4.5362in" svg:y1="1.85in" svg:x2="6.9961in" svg:y2="1.85in"><text:p text:style-name="P5"><text:span text:style-name="T72"><text:s text:c="3"/>Younger Jehoiachin born</text:span></text:p><text:p text:style-name="P5"><text:span text:style-name="T72"><text:s text:c="3"/>Jehoiakim age: 27</text:span></text:p></draw:line><draw:line draw:style-name="gr12" draw:text-style-name="P33" svg:x1="3.9465in" svg:y1="0.85in" svg:x2="5.5264in" svg:y2="0.85in"><text:p text:style-name="P5"><text:span text:style-name="T72"><text:s text:c="3"/>Elder Jehoiachin born</text:span></text:p><text:p text:style-name="P5"><text:span text:style-name="T72"><text:s text:c="3"/>Jehoiakim age: 17</text:span></text:p></draw:line><draw:custom-shape draw:style-name="gr69" draw:text-style-name="P135" xml:id="id12" draw:id="id12" svg:width="1.3634in" svg:height="1.2177in" svg:x="0.4917in" svg:y="0.4138in"><draw:glue-point draw:id="4" svg:x="-1.9685in" svg:y="1.765in"/><draw:glue-point draw:id="5" svg:x="-1.6878in" svg:y="-1.2461in"/><draw:glue-point draw:id="6" svg:x="-1.9685in" svg:y="-1.6898in"/><draw:glue-point draw:id="7" svg:x="-0.7012in" svg:y="1.9685in"/><text:p text:style-name="P134"><text:span text:style-name="T229">Which Jehoiachin does the name “Jeconiah” refer to? Likely also the elder.</text:span></text:p><text:p text:style-name="P134"><text:span text:style-name="T229"/></text:p><text:p text:style-name="P134"><text:span text:style-name="T229">“Jeconiah” H3659</text:span></text:p><text:p text:style-name="P134"><text:span text:style-name="T229"/></text:p><text:p text:style-name="P134"><text:span text:style-name="T229">כׇּנְיָהוּ</text:span><text:span text:style-name="T229"> </text:span><text:span text:style-name="T229">(Konyâhûw | kon-yaw'-hoo)</text:span></text:p><text:p text:style-name="P134"><text:span text:style-name="T229">Derivation: for </text:span><text:span text:style-name="T229">יְכׇנְיָה</text:span><text:span text:style-name="T229"> </text:span><text:span text:style-name="T229">(H3204)</text:span></text:p><text:p text:style-name="P134"><text:span text:style-name="T229">Strong's: Conjah, an Israelite king</text:span></text:p><text:p text:style-name="P134"><text:span text:style-name="T229">KJV: Coniah.</text:span></text:p><draw:enhanced-geometry svg:viewBox="0 0 21600 21600" draw:type="rectangle" draw:enhanced-path="M 0 0 L 21600 0 21600 21600 0 21600 0 0 Z N"/></draw:custom-shape><draw:line draw:style-name="gr72" draw:text-style-name="P141" svg:x1="4.3555in" svg:y1="3.8472in" svg:x2="6.7154in" svg:y2="3.8472in"><text:p text:style-name="P5"><text:span text:style-name="T221">Age: 32 <text:s text:c="93"/></text:span></text:p><text:p text:style-name="P5"><text:span text:style-name="T221"><text:s text:c="16"/>Jer 52:5, Eze 5:2, 40:1</text:span></text:p></draw:line><draw:custom-shape draw:style-name="gr73" draw:text-style-name="P137" xml:id="id18" draw:id="id18" svg:width="0.8598in" svg:height="0.0303in" svg:x="3.2256in" svg:y="2.7157in"><draw:glue-point draw:id="4" svg:x="-1.7323in" svg:y="-1.9685in"/><text:p text:style-name="P136"><text:span text:style-name="T231">Jehoiachin 3m 2Ki 24:8,15</text:span></text:p><text:p text:style-name="P136"><text:span text:style-name="T2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142" svg:x1="1.8764in" svg:y1="3.1441in" svg:x2="3.2217in" svg:y2="3.1441in"><text:p text:style-name="P5"><text:span text:style-name="T218"/></text:p><text:p text:style-name="P5"><text:span text:style-name="T218">12</text:span><text:span text:style-name="T237">th</text:span><text:span text:style-name="T218"> year <text:s text:c="25"/>4</text:span><text:span text:style-name="T237">th</text:span><text:span text:style-name="T218"> year, 5</text:span><text:span text:style-name="T237">th</text:span><text:span text:style-name="T218"> month Jer 28:1</text:span></text:p></draw:line><draw:line draw:style-name="gr11" draw:text-style-name="P143" svg:x1="4.5248in" svg:y1="3.1417in" svg:x2="5.0846in" svg:y2="3.1417in"><text:p text:style-name="P11"><text:span text:style-name="T221">4</text:span><text:span text:style-name="T238">th</text:span><text:span text:style-name="T221"> year Jer 51:59</text:span></text:p><text:p text:style-name="P11"><text:span text:style-name="T221"/></text:p></draw:line><draw:line draw:style-name="gr64" draw:text-style-name="P120" svg:x1="1.8764in" svg:y1="3.6425in" svg:x2="4.5244in" svg:y2="3.6417in"><text:p text:style-name="P11"><text:span text:style-name="T239"><text:s text:c="4"/>17</text:span><text:span text:style-name="T240">th</text:span><text:span text:style-name="T239"> year</text:span></text:p><text:p text:style-name="P11"><text:span text:style-name="T80"/></text:p></draw:line><draw:connector draw:style-name="gr74" draw:text-style-name="P34" draw:type="curve" svg:x1="2.1902in" svg:y1="3.2425in" svg:x2="2.3575in" svg:y2="2.7472in" draw:start-shape="id16" draw:start-glue-point="4" draw:end-shape="id17" draw:end-glue-point="4" svg:d="M5563 8236c0-762 425-134 425-1258" svg:viewBox="0 0 427 1259"><text:p/></draw:connector><draw:custom-shape draw:style-name="gr69" draw:text-style-name="P135" xml:id="id14" draw:id="id14" svg:width="1.8079in" svg:height="0.2913in" svg:x="2.9752in" svg:y="4.0583in"><draw:glue-point draw:id="4" svg:x="-1.9685in" svg:y="1.765in"/><draw:glue-point draw:id="5" svg:x="-1.6878in" svg:y="-1.2461in"/><draw:glue-point draw:id="6" svg:x="-1.9685in" svg:y="-1.6898in"/><draw:glue-point draw:id="7" svg:x="-0.7012in" svg:y="1.9685in"/><text:p text:style-name="P134"><text:span text:style-name="T229">Jehoiakim &amp; both Jehoiachin’s are carried away to Babylon in the same year.</text:span></text:p><draw:enhanced-geometry svg:viewBox="0 0 21600 21600" draw:type="rectangle" draw:enhanced-path="M 0 0 L 21600 0 21600 21600 0 21600 0 0 Z N"/></draw:custom-shape><draw:connector draw:style-name="gr58" draw:text-style-name="P34" draw:type="curve" draw:line-skew="-0.0555in" svg:x1="2.6492in" svg:y1="1.5984in" svg:x2="3.278in" svg:y2="2.7161in" draw:start-shape="id13" draw:start-glue-point="2" draw:end-shape="id18" draw:end-glue-point="4" svg:d="M6729 4060c0 1842 1597 424 1597 2839" svg:viewBox="0 0 1598 2840"><text:p/></draw:connector></draw:g></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44"/>
      <text:p text:style-name="P144"/>
      <text:p text:style-name="P144"/>
      <text:p text:style-name="P144"/>
      <text:p text:style-name="P144"/>
      <text:p text:style-name="P144"/>
      <text:p text:style-name="P144"/>
      <text:p text:style-name="P144"><text:span text:style-name="T241">W</text:span>hen we <text:span text:style-name="T242">put</text:span> together all the details that we are given in a way that agrees with all of scripture a fuller picture emerge<text:span text:style-name="T243">s</text:span> of the events surrounding the 2<text:span text:style-name="T17">nd</text:span> s<text:span text:style-name="T244">ie</text:span>ge of Jerusalem. <text:span text:style-name="T245">We know that n</text:span><text:span text:style-name="T246">either the people </text:span><text:span text:style-name="T247">or</text:span><text:span text:style-name="T246"> God made either Jehoiachin king. So what we see is that </text:span><text:span text:style-name="T248">near the end of the </text:span><text:span text:style-name="T246">last year of his reign, Jehoiakim, </text:span><text:span text:style-name="T243">when he saw </text:span><text:span text:style-name="T249">(or heard of)</text:span><text:span text:style-name="T243"> his end swiftly approaching,</text:span><text:span text:style-name="T246"> attempted to secure the throne for his family by naming two of his sons king. </text:span><text:span text:style-name="T250">Since the younger Jehoiachin’s reign was 10 days longer than the elder, he was either made king 10 days before his older brother or his reign ended 10 days after his older brother. </text:span><text:span text:style-name="T251">If </text:span><text:span text:style-name="T252">2Ki 24:10-17</text:span><text:span text:style-name="T251"> is written chronologically then the younger was taken before the elder which leans towards the younger </text:span><text:span text:style-name="T253">being</text:span><text:span text:style-name="T251"> made king 10 days before his older brother.</text:span></text:p>
      <text:p text:style-name="P118"/>
      <text:p text:style-name="P118"/>
      <table:table table:name="Table12" table:style-name="Table12">
        <table:table-column table:style-name="Table12.A"/>
        <table:table-row>
          <table:table-cell table:style-name="Table12.A1" office:value-type="string">
            <text:p text:style-name="P145">Jeremiah 52:31</text:p>
            <text:p text:style-name="P146">And it came to pass in the seven and thirtieth year of the captivity of Jehoiachin king of Judah, <text:span text:style-name="T20">in the twelfth month, in the five and twentieth day of the month</text:span>, that Evil-merodach king of Babylon in the first year of his reign lifted up the head of Jehoiachin king of Judah, and brought him forth out of prison,</text:p>
          </table:table-cell>
        </table:table-row>
        <table:table-row>
          <table:table-cell table:style-name="Table12.A2" office:value-type="string">
            <text:p text:style-name="P147">2 Kings 25:27</text:p>
            <text:p text:style-name="P148">And it came to pass in the seven and thirtieth year of the captivity of Jehoiachin king of Judah, <text:span text:style-name="T20">in the twelfth month, on the seven and twentieth day of the month</text:span>, that Evil-merodach king of Babylon in the year that he began to reign did lift up the head of Jehoiachin king of Judah out of prison;</text:p>
          </table:table-cell>
        </table:table-row>
      </table:table>
      <text:list text:style-name="L11">
        <text:list-item>
          <text:p text:style-name="P149">As an added bonus these two verses that at first glance seem to indicate that the same man was taken out of prison on two different days <text:span text:style-name="T254">now </text:span>make perfect sense.</text:p>
        </text:list-item>
        <text:list-item>
          <text:p text:style-name="P150">And that begs the question: which one was released <text:span text:style-name="T255">from prison </text:span>first?</text:p>
        </text:list-item>
      </text:list>
      <text:p text:style-name="P118"/>
      <text:p text:style-name="P151"/>
      <table:table table:name="Table10" table:style-name="Table10">
        <table:table-column table:style-name="Table10.A"/>
        <table:table-row>
          <table:table-cell table:style-name="Table10.A1" office:value-type="string">
            <text:p text:style-name="P152">Jeremiah 22:24</text:p>
            <text:p text:style-name="P153">As I live, saith the LORD, though <text:span text:style-name="T175">Coniah the son of Jehoiakim king of Judah</text:span> were the signet upon my right hand, yet would I pluck thee thence;</text:p>
          </table:table-cell>
        </table:table-row>
        <table:table-row table:style-name="Table10.2">
          <table:table-cell table:style-name="Table10.A2" office:value-type="string">
            <text:p text:style-name="P152">Jeremiah 24:1</text:p>
            <text:p text:style-name="P153">The LORD shewed me, and, behold, two baskets of figs were set before the temple of the LORD, after that Nebuchadrezzar king of Babylon had carried away captive <text:span text:style-name="T175">Jeconiah the son of Jehoiakim king of Judah</text:span>, and the princes of Judah, with the carpenters and smiths, from Jerusalem, and had brought them to Babylon.</text:p>
          </table:table-cell>
        </table:table-row>
      </table:table>
      <text:list text:style-name="L12">
        <text:list-item>
          <text:p text:style-name="P154">We already know that there are two Jehoiachin’s that are both the sons of Jehoiakim <text:span text:style-name="T256">and elsewhere in the Bible we see the names “Jeconiah” and “Coniah” being used to seemingly refer to a Jehoiachin son of Jehoiakim king of Judah.</text:span></text:p>
        </text:list-item>
        <text:list-item>
          <text:p text:style-name="P154">So, which one is Coniah and which one is Jeconiah? <text:span text:style-name="T257">O</text:span><text:span text:style-name="T258">r are they both names for only one of the Jehoiachins?</text:span></text:p>
        </text:list-item>
      </text:list>
      <text:p text:style-name="P155"/>
      <text:p text:style-name="P155"><text:soft-page-break/></text:p>
      <text:p text:style-name="P156">Collecting details <text:span text:style-name="T259">by comparing and contrasting </text:span><text:span text:style-name="T260">scripture with itself</text:span></text:p>
      <text:p text:style-name="P155"/>
      <text:p text:style-name="P155"/>
      <table:table table:name="Table13" table:style-name="Table13">
        <table:table-column table:style-name="Table13.A"/>
        <table:table-column table:style-name="Table13.B"/>
        <table:table-column table:style-name="Table13.C"/>
        <table:table-row>
          <table:table-cell table:style-name="Table13.A1" office:value-type="string">
            <text:p text:style-name="P157"><text:span text:style-name="T18">2 Kings 24:8-9</text:span><text:line-break/><text:span text:style-name="T19">8</text:span> ¶ Jehoiachin <text:span text:style-name="T22">was</text:span> <text:span text:style-name="T20">eighteen years old when he began to reign</text:span>, and he reigned in Jerusalem <text:span text:style-name="T129">three months</text:span>. And his mother's name <text:span text:style-name="T22">was</text:span> Nehushta, the daughter of Elnathan of Jerusalem.</text:p>
            <text:p text:style-name="P157"><text:span text:style-name="T19">9</text:span> And he did <text:span text:style-name="T22">that which was</text:span> evil in the sight of the LORD, according to all that his father had done.</text:p>
          </table:table-cell>
          <table:table-cell table:style-name="Table13.B1" office:value-type="string">
            <text:p text:style-name="Table_20_Contents"/>
          </table:table-cell>
          <table:table-cell table:style-name="Table13.C1" office:value-type="string">
            <text:p text:style-name="P158">The elder Jehoiachin was 10 years older than his younger brother <text:span text:style-name="T261">and his mother’s name is Nehushta.</text:span></text:p>
          </table:table-cell>
        </table:table-row>
        <table:table-row>
          <table:table-cell table:style-name="Table13.A2" office:value-type="string">
            <text:p text:style-name="P157"><text:span text:style-name="T18">2 Kings 24:10-14</text:span><text:line-break/><text:span text:style-name="T19">10</text:span> ¶ At that time the servants of Nebuchadnezzar king of Babylon came up against Jerusalem, and the city was besieged.</text:p>
            <text:p text:style-name="P157"><text:span text:style-name="T19">11</text:span> And Nebuchadnezzar king of Babylon came against the city, and his servants did besiege it.</text:p>
            <text:p text:style-name="P157"><text:span text:style-name="T19">12</text:span> <text:span text:style-name="T175">And Jehoiachin the king of Judah went out to the king of Babylon, he, and his mother, and his servants, and his princes, and his officers: and the king of Babylon took him in the eighth year of his reign.</text:span></text:p>
            <text:p text:style-name="P157"><text:span text:style-name="T19">13</text:span> And he carried out thence <text:span text:style-name="T262">all the treasures of the house of the LORD</text:span>, and the treasures of the king's house, and <text:span text:style-name="T20">cut in pieces all the vessels of gold</text:span> which Solomon king of Israel had made in the temple of the LORD, as the LORD had said.</text:p>
            <text:p text:style-name="P157"><text:span text:style-name="T19">14</text:span> And he carried away all Jerusalem, and all the princes, and all the mighty men of valour, <text:span text:style-name="T22">even</text:span> ten thousand captives, and all the <text:span text:style-name="T88">craftsmen and smiths:</text:span> none remained, save the poorest sort of the people of the land.</text:p>
          </table:table-cell>
          <table:table-cell table:style-name="Table13.B2" office:value-type="string">
            <text:p text:style-name="P157"><text:span text:style-name="T18">2 Chronicles 36:8-10</text:span><text:line-break/><text:span text:style-name="T19">8</text:span> Now the rest of the acts of Jehoiakim, and his abominations which he did, and that which was found in him, behold, they <text:span text:style-name="T22">are</text:span> written in the book of the kings of Israel and Judah: and Jehoiachin his son reigned in his stead.</text:p>
            <text:p text:style-name="P157"><text:span text:style-name="T19">9</text:span> ¶ Jehoiachin <text:span text:style-name="T22">was</text:span> <text:span text:style-name="T20">eight years old when he began to reign</text:span>, and he reigned <text:span text:style-name="T129">three months and ten days</text:span> in Jerusalem: and he did <text:span text:style-name="T22">that which was</text:span> evil in the sight of the LORD.<text:line-break/><text:span text:style-name="T19">10</text:span> And when the year was expired, king Nebuchadnezzar sent, and brought him to Babylon, <text:span text:style-name="T262">with the goodly vessels of the house of the LORD</text:span>, and made Zedekiah his brother king over Judah and Jerusalem.</text:p>
          </table:table-cell>
          <table:table-cell table:style-name="Table13.C2" office:value-type="string">
            <text:p text:style-name="P159">A new paragraph begins and if we aren’t careful we won’t notice that the Jehoiachin being referred to <text:span text:style-name="T263">s</text:span>witches to the younger <text:span text:style-name="T264">right after giving us an overview of the elder</text:span>. We can know this by comparing who was carried away with each respective Jehoiachin.</text:p>
            <text:p text:style-name="P159"/>
            <text:p text:style-name="P160">The younger Jehoiachin <text:span text:style-name="T265">had no wife and thus also had no children at age 8 </text:span><text:span text:style-name="T266">and so his wife or wives are not listed as being taken with him.</text:span></text:p>
            <text:p text:style-name="P161"/>
            <text:p text:style-name="P162"><text:span text:style-name="T267">E</text:span>ach Jehoiachin is carried away with his mother, indicating that they had the same father but different mothers.</text:p>
          </table:table-cell>
        </table:table-row>
        <table:table-row>
          <table:table-cell table:style-name="Table13.A2" office:value-type="string">
            <text:p text:style-name="P157"><text:span text:style-name="T18">2 Kings 24:15-17</text:span><text:line-break/><text:span text:style-name="T19">15</text:span> <text:span text:style-name="T129">And</text:span><text:span text:style-name="T175"> he carried away Jehoiachin to Babylon, and the king's mother, </text:span><text:span text:style-name="T129">and the king's wives</text:span><text:span text:style-name="T175">, and his officers, and the mighty of the land, </text:span><text:span text:style-name="T268">those</text:span><text:span text:style-name="T175"> carried he into captivity from Jerusalem to Babylon.</text:span><text:line-break/><text:span text:style-name="T19">16</text:span> And all the men of might, <text:span text:style-name="T22">even</text:span> seven thousand, and craftsmen and smiths a thousand, all <text:span text:style-name="T22">that were</text:span> strong <text:span text:style-name="T22">and</text:span> apt for war, even them the king of Babylon brought captive to Babylon.</text:p>
            <text:p text:style-name="P157"><text:span text:style-name="T19">17</text:span> ¶ And the king of Babylon made Mattaniah his father's brother king in his stead, and changed his name to Zedekiah.</text:p>
          </table:table-cell>
          <table:table-cell table:style-name="Table13.B3" office:value-type="string">
            <text:p text:style-name="P163">Jeremiah 22:28</text:p>
            <text:p text:style-name="P164">Is this man Coniah a despised broken idol? is he a vessel wherein is no pleasure? wherefore are they cast out, <text:span text:style-name="T129">he and his seed</text:span>, and are cast into a land which they know not?</text:p>
          </table:table-cell>
          <table:table-cell table:style-name="Table13.C2" office:value-type="string">
            <text:p text:style-name="P165">The elder Jehoiachin was accompanied by his wives (plural) <text:span text:style-name="T269">and his seed (singular).</text:span></text:p>
          </table:table-cell>
        </table:table-row>
      </table:table>
      <text:p text:style-name="P155"/>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166"><text:span text:style-name="T270">When we look at the verses where “Coniah” appears we can see that in at least two of them (</text:span><text:span text:style-name="T271">Jer 22:28,30</text:span><text:span text:style-name="T270">), </text:span>before the events of the <text:span text:style-name="T272">2</text:span><text:span text:style-name="T273">nd</text:span> s<text:span text:style-name="T274">ie</text:span>ge <text:span text:style-name="T18">Jer 22:25</text:span><text:span text:style-name="T270">, </text:span><text:span text:style-name="T275">that </text:span><text:span text:style-name="T270">that name refers to a Jehoiachin that has </text:span><text:span text:style-name="T276">one child. </text:span><text:span text:style-name="T277">The siege began when the younger Jehoiachin was 8 years old.</text:span></text:p>
      <text:p text:style-name="P166"/>
      <text:p text:style-name="P167">Not only is the younger Jehoiachin not listed as being take<text:span text:style-name="T278">n</text:span> with a wife or wives <text:span text:style-name="T279">but </text:span>we <text:span text:style-name="T279">also </text:span>have no other evidence to suggest that by 8 years old he had any wife or children and this makes a strong case that the name “Coniah” <text:span text:style-name="T280">is another name for </text:span><text:span text:style-name="T100">the elder Jehoiachin.</text:span></text:p>
      <text:p text:style-name="P168"/>
      <text:p text:style-name="P169">The name “Jeconiah” is a bit more mysterious. <text:span text:style-name="T281">None of the verses that mention that name (</text:span><text:span text:style-name="T282">1Ch 3:16,17</text:span><text:span text:style-name="T283">, </text:span><text:span text:style-name="T282">Est 2:6</text:span><text:span text:style-name="T283">, </text:span><text:span text:style-name="T282">Jer 24:1</text:span><text:span text:style-name="T283">, </text:span><text:span text:style-name="T282">27:20</text:span><text:span text:style-name="T283">, </text:span><text:span text:style-name="T282">28:4</text:span><text:span text:style-name="T283">, </text:span><text:span text:style-name="T282">29:2</text:span><text:span text:style-name="T281">) </text:span><text:span text:style-name="T284">give us definitive evidence that </text:span><text:span text:style-name="T283">point</text:span><text:span text:style-name="T284">s </text:span><text:span text:style-name="T283">to either Jehoiachin. </text:span><text:span text:style-name="T275">The only evidence that we </text:span><text:span text:style-name="T285">do </text:span><text:span text:style-name="T275">have to </text:span><text:span text:style-name="T286">guess</text:span><text:span text:style-name="T275"> which of the Jehoiachin’s it is referring to is in the Strong’s number for the </text:span><text:span text:style-name="T287">Hebre</text:span><text:span text:style-name="T288">w </text:span><text:span text:style-name="T289">word כׇּנְיָהוּ (Konyâhûw | kon-yaw'-hoo </text:span><text:span text:style-name="T290">| Coniah</text:span><text:span text:style-name="T289">) </text:span><text:span text:style-name="T288">which is H3659. </text:span><text:span text:style-name="T291">According to Strongs “Coniah” H3659 is derived from “Je</text:span><text:span text:style-name="T292">coniah</text:span><text:span text:style-name="T291">” H3204.</text:span></text:p>
      <text:p text:style-name="P170"/>
      <text:p text:style-name="P171"><text:span text:style-name="T293">And </text:span><text:span text:style-name="T294">the conclusion is that both</text:span><text:span text:style-name="T293"> “Jeconiah” and “Coniah” refer to the elder Jehoiachin.</text:span></text:p>
      <text:p text:style-name="P172"/>
      <text:p text:style-name="P171"><text:span text:style-name="T295">Building on that, we see that in the entire book of Jeremiah the name “Jehoiachin” shows up only one time. The other names “Jeconiah” and “Coniah” both refer to the elder Jehoiachin and so it seems much more likely that</text:span> <text:span text:style-name="T18">Jer 52:31</text:span> <text:span text:style-name="T296">refers to the younger Jehoiachin </text:span><text:span text:style-name="T297">which if true means that </text:span><text:span text:style-name="T298">the younger Jehoiachin was released from prison 2 days before his elder brother.</text:span></text:p>
      <text:p text:style-name="Standard"/>
      <text:p text:style-name="P170"/>
      <text:p text:style-name="P173">Fun fact<text:span text:style-name="T299">s</text:span></text:p>
      <text:list text:style-name="L13">
        <text:list-item>
          <text:p text:style-name="P174">Both the younger and elder Jehoiachin survived until at least age<text:span text:style-name="T300">s</text:span> 45 &amp; 55 <text:span text:style-name="T301">respectively </text:span>(<text:span text:style-name="T18">2Ki 25:27</text:span>, <text:span text:style-name="T18">Jer 52:31</text:span>).</text:p>
        </text:list-item>
        <text:list-item>
          <text:p text:style-name="P175"><text:span text:style-name="T302">I</text:span><text:span text:style-name="T303">f he </text:span><text:span text:style-name="T304">lived</text:span><text:span text:style-name="T303"> </text:span><text:span text:style-name="T305">long enough,</text:span><text:span text:style-name="T303"> the elder Jehoiachin would have been 88 </text:span><text:span text:style-name="T306">years old </text:span><text:span text:style-name="T303">at the end of </text:span><text:span text:style-name="T307">the </text:span><text:span text:style-name="T303">captivity</text:span><text:span text:style-name="T307">, </text:span><text:span text:style-name="T302">but</text:span><text:span text:style-name="T308"> n</text:span><text:span text:style-name="T303">either him </text:span><text:span text:style-name="T308">or</text:span><text:span text:style-name="T303"> his mothe</text:span><text:span text:style-name="T309">r</text:span><text:span text:style-name="T303"> </text:span><text:span text:style-name="T310">return</text:span><text:span text:style-name="T303">ed</text:span><text:span text:style-name="T310"> to Jerusalem (</text:span><text:span text:style-name="T311">Jer 22:26</text:span><text:span text:style-name="T310">).</text:span></text:p>
        </text:list-item>
        <text:list-item>
          <text:p text:style-name="P176">The beginning of the 70 year<text:span text:style-name="T312">s of </text:span>captivity appears to be reckoned from the beginning of the captivity of <text:span text:style-name="T313">the elder </text:span>Jehoiachin (<text:span text:style-name="T18">2Ch 36:9,10</text:span>, <text:span text:style-name="T18">Jer 29:1,2,10</text:span>).</text:p>
          <text:list>
            <text:list-item>
              <text:p text:style-name="P176">Which was during/after the 2<text:span text:style-name="T17">nd</text:span> of three sieges of Jerusalem by Nebuchadnezzar.</text:p>
            </text:list-item>
            <text:list-item>
              <text:p text:style-name="P176">The 3<text:span text:style-name="T17">rd</text:span> and final siege was the one when Jerusalem was destroyed and burned (<text:span text:style-name="T18">Eze 33:21</text:span> “smitten”).</text:p>
            </text:list-item>
          </text:list>
        </text:list-item>
        <text:list-item>
          <text:p text:style-name="P177">In order for Daniel to be in Babylon during the 2<text:span text:style-name="T17">nd</text:span> year of the reign of Nebuchadnezzar (<text:span text:style-name="T18">Dan 2:1</text:span>) he would have to have been taken in the 1<text:span text:style-name="T17">st</text:span> siege of Jerusalem <text:span text:style-name="T314">which occurred during the 3</text:span><text:span text:style-name="T315">rd</text:span><text:span text:style-name="T314"> year of the reign of Jehoiakim king of Judah.</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Ubuntu" svg:font-family="Ubuntu" style:font-family-generic="system" style:font-pitch="variable"/>
  </office:font-face-decls>
  <office:styles>
    <draw:marker draw:name="Arrowheads_20_13" draw:display-name="Arrowheads 13" svg:viewBox="0 0 1131 754" svg:d="M566 0l-566 754 114-85 136-68 148-46 161-17 161 13 153 46 140 68 118 89z"/>
    <draw:marker draw:name="Arrowheads_20_14" draw:display-name="Arrowheads 14" svg:viewBox="0 0 1131 754" svg:d="M566 0l-566 754 114-85 136-68 148-46 161-17 161 13 153 46 140 68 118 89z"/>
    <draw:marker draw:name="Arrowheads_20_8" draw:display-name="Arrowheads 8" svg:viewBox="0 0 1131 754" svg:d="M566 0l-566 754 114-85 136-68 148-46 161-17 161 13 153 46 140 68 118 89z"/>
    <draw:marker draw:name="Concave_20_short" draw:display-name="Concave short" svg:viewBox="0 0 1131 754" svg:d="M566 0l-566 754 114-85 136-68 148-46 161-17 161 13 153 46 140 68 118 89z"/>
    <draw:stroke-dash draw:name="Dash" draw:style="rect" draw:dots1="1" draw:dots1-length="170%" draw:distance="57%"/>
    <draw:stroke-dash draw:name="Dash_20_Dot_20_4" draw:display-name="Dash Dot 4" draw:style="rect" draw:dots1="1" draw:dots1-length="0.0043in" draw:dots2="1" draw:dots2-length="0.0043in" draw:distance="0.0043in"/>
    <draw:stroke-dash draw:name="Dot" draw:style="rect" draw:dots1="1" draw:dots1-length="57%"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text-align="left" style:justify-single-word="false" fo:orphans="0" fo:widows="0" fo:padding="0.0098in" fo:border="none" style:shadow="none" text:number-lines="false" text:line-number="0"/>
    </style:style>
    <style:style style:name="Table" style:family="paragraph" style:parent-style-name="Caption" style:class="extra">
      <style:paragraph-properties fo:padding="0.0098in" fo:border="0.74pt solid #000000" style:shadow="none"/>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Liberation Sans1" fo:font-family="'Liberation Sans'" style:font-style-name="Regular" style:font-family-generic="swiss" style:font-pitch="variable" fo:font-size="12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Ubuntu" style:font-family-complex="Ubuntu"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1T13:49:36.493634921</meta:creation-date>
    <dc:title>default</dc:title>
    <meta:editing-duration>PT11H16M23S</meta:editing-duration>
    <meta:editing-cycles>511</meta:editing-cycles>
    <meta:generator>LibreOffice/26.2.4.2$Linux_X86_64 LibreOffice_project/64a984c51f4702dbd3710b13428c673a2f1292e7</meta:generator>
    <dc:date>2026-07-11T12:19:48.709480961</dc:date>
    <meta:document-statistic meta:table-count="13" meta:image-count="0" meta:object-count="0" meta:page-count="9" meta:paragraph-count="146" meta:word-count="4390" meta:character-count="23283" meta:non-whitespace-character-count="19095"/>
    <meta:template xlink:type="simple" xlink:actuate="onRequest" xlink:title="default" xlink:href="../Amazing%20facts%20about%20the%20kings%20of%20Israel%20and%20Judah.ott" meta:date="2025-08-01T13:49:36.162970152"/>
  </office:meta>
</office:document-meta>
</file>