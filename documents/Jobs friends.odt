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3939d8"/>
    </style:style>
    <style:style style:name="P2" style:family="paragraph" style:parent-style-name="Table_20_Contents">
      <style:text-properties fo:color="#127622" loext:opacity="100%" officeooo:paragraph-rsid="001b6c60"/>
    </style:style>
    <style:style style:name="P3" style:family="paragraph" style:parent-style-name="Table_20_Contents">
      <style:text-properties officeooo:paragraph-rsid="001b6c60"/>
    </style:style>
    <style:style style:name="P4" style:family="paragraph" style:parent-style-name="Table_20_Contents">
      <style:text-properties officeooo:rsid="0025bf88" officeooo:paragraph-rsid="0025bf88"/>
    </style:style>
    <style:style style:name="T1" style:family="text">
      <style:text-properties fo:background-color="#ffff00" loext:char-shading-value="0"/>
    </style:style>
    <style:style style:name="T2" style:family="text">
      <style:text-properties style:text-position="super 58%" officeooo:rsid="003b0565"/>
    </style:style>
    <style:style style:name="T3" style:family="text">
      <style:text-properties officeooo:rsid="003db82e"/>
    </style:style>
    <style:style style:name="T4" style:family="text">
      <style:text-properties style:text-position="33% 80%"/>
    </style:style>
    <style:style style:name="T5" style:family="text">
      <style:text-properties style:text-position="super 58%" officeooo:rsid="003c902c"/>
    </style:style>
    <style:style style:name="T6" style:family="text">
      <style:text-properties fo:background-color="#ffbf00" loext:char-shading-value="0"/>
    </style:style>
    <style:style style:name="T7" style:family="text">
      <style:text-properties style:text-position="super 58%" officeooo:rsid="003ce802"/>
    </style:style>
    <style:style style:name="T8" style:family="text">
      <style:text-properties officeooo:rsid="0040a5cc"/>
    </style:style>
    <style:style style:name="T9" style:family="text">
      <style:text-properties officeooo:rsid="004164df"/>
    </style:style>
    <style:style style:name="T10" style:family="text">
      <style:text-properties fo:font-style="italic"/>
    </style:style>
    <style:style style:name="T11" style:family="text">
      <style:text-properties style:text-position="super 58%" officeooo:rsid="003f6f78"/>
    </style:style>
    <style:style style:name="T12" style:family="text">
      <style:text-properties style:text-position="super 58%" officeooo:rsid="00274b49"/>
    </style:style>
    <style:style style:name="T13" style:family="text">
      <style:text-properties style:text-position="super 58%" officeooo:rsid="00293b41"/>
    </style:style>
    <style:style style:name="T14" style:family="text">
      <style:text-properties style:text-position="super 58%" officeooo:rsid="001eb4bf"/>
    </style:style>
    <style:style style:name="T15" style:family="text">
      <style:text-properties style:text-position="super 58%" officeooo:rsid="001c6058"/>
    </style:style>
    <style:style style:name="T16" style:family="text">
      <style:text-properties fo:color="#127622" loext:opacity="100%"/>
    </style:style>
    <style:style style:name="T17" style:family="text">
      <style:text-properties officeooo:rsid="001f8a86"/>
    </style:style>
    <style:style style:name="T18" style:family="text">
      <style:text-properties officeooo:rsid="0035dcd1"/>
    </style:style>
    <style:style style:name="T19" style:family="text">
      <style:text-properties officeooo:rsid="003663ea"/>
    </style:style>
    <style:style style:name="T20" style:family="text">
      <style:text-properties officeooo:rsid="00367dd4"/>
    </style:style>
    <style:style style:name="T21" style:family="text">
      <style:text-properties officeooo:rsid="00217e51"/>
    </style:style>
    <style:style style:name="T22" style:family="text">
      <style:text-properties style:text-position="super 58%" officeooo:rsid="001e0936"/>
    </style:style>
    <style:style style:name="T23" style:family="text">
      <style:text-properties officeooo:rsid="002e9cb8"/>
    </style:style>
    <style:style style:name="T24" style:family="text">
      <style:text-properties style:text-position="super 58%" officeooo:rsid="002738f9"/>
    </style:style>
    <style:style style:name="T25" style:family="text">
      <style:text-properties officeooo:rsid="00307ff8"/>
    </style:style>
    <style:style style:name="T26" style:family="text">
      <style:text-properties style:text-position="super 58%" officeooo:rsid="002b583e"/>
    </style:style>
    <style:style style:name="T27" style:family="text">
      <style:text-properties officeooo:rsid="00323458"/>
    </style:style>
    <style:style style:name="T28" style:family="text">
      <style:text-properties officeooo:rsid="0032dbe4"/>
    </style:style>
    <style:style style:name="T29" style:family="text">
      <style:text-properties officeooo:rsid="00331124"/>
    </style:style>
    <style:style style:name="T30" style:family="text">
      <style:text-properties officeooo:rsid="0034f822"/>
    </style:style>
    <style:style style:name="T31" style:family="text">
      <style:text-properties style:text-position="super 58%" officeooo:rsid="00323458" fo:background-color="transparent" loext:char-shading-value="0"/>
    </style:style>
    <style:style style:name="T32" style:family="text">
      <style:text-properties fo:font-style="italic"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row>
          <table:table-cell table:style-name="Table5.A1" office:value-type="string">
            <text:p text:style-name="P1">Job 1:1</text:p>
            <text:p text:style-name="P1">There was a man in the land of <text:span text:style-name="T1">Uz</text:span><text:span text:style-name="T2">H5780</text:span>, whose name was Job; and that man was perfect and upright, and one that feared God, and eschewed evil.</text:p>
          </table:table-cell>
        </table:table-row>
      </table:table>
      <text:p text:style-name="Text_20_body"/>
      <table:table table:name="Table6" table:style-name="Table6">
        <table:table-column table:style-name="Table6.A"/>
        <table:table-row>
          <table:table-cell table:style-name="Table6.A1" office:value-type="string">
            <text:p text:style-name="Table_20_Contents">Genesis 10:22-23 <text:span text:style-name="T3">(1 Chronicles 1:17)</text:span><text:line-break/><text:span text:style-name="T4">22</text:span> The <text:span text:style-name="T1">children of Shem</text:span>; Elam, and Asshur, and Arphaxad, and Lud, and Aram. <text:line-break/><text:span text:style-name="T4">23</text:span> And the children of Aram; <text:span text:style-name="T1">Uz</text:span><text:span text:style-name="T5">H5780</text:span>, and Hul, and Gether, and Mash.</text:p>
            <text:p text:style-name="Table_20_Contents"><text:line-break/>Genesis 22:20-23<text:line-break/><text:span text:style-name="T4">20</text:span> And it came to pass after these things, that it was told Abraham, saying, Behold, Milcah, she hath also born children unto thy brother <text:span text:style-name="T1">Nahor</text:span>; <text:line-break/><text:span text:style-name="T4">21</text:span> <text:span text:style-name="T6">Huz</text:span><text:span text:style-name="T7">H5780</text:span> his firstborn, and Buz his brother, and Kemuel the father of Aram, <text:line-break/><text:span text:style-name="T4">22</text:span> And Chesed, and Hazo, and Pildash, and Jidlaph, and Bethuel. <text:line-break/><text:span text:style-name="T4">23</text:span> And Bethuel begat Rebekah: these eight Milcah did bear to Nahor, Abraham's brother.<text:line-break/><text:line-break/>Genesis 36:20-28 <text:span text:style-name="T8">(1 Chronicles 1:</text:span><text:span text:style-name="T9">38-</text:span><text:span text:style-name="T8">42)</text:span><text:line-break/><text:span text:style-name="T4">20</text:span> These <text:span text:style-name="T10">are</text:span> the <text:span text:style-name="T1">sons of Seir the Horite</text:span>, who inhabited the land; Lotan, and Shobal, and Zibeon, and Anah, <text:line-break/><text:span text:style-name="T4">21</text:span> And Dishon, and Ezer, and <text:span text:style-name="T1">Dishan</text:span>: these <text:span text:style-name="T10">are</text:span> the dukes of the Horites, the children of Seir in the land of Edom. <text:line-break/><text:span text:style-name="T4">22</text:span> And the children of Lotan were Hori and Hemam; and Lotan's sister <text:span text:style-name="T10">was</text:span> Timna. <text:line-break/><text:span text:style-name="T4">23</text:span> And the children of Shobal <text:span text:style-name="T10">were</text:span> these; Alvan, and Manahath, and Ebal, Shepho, and Onam. <text:line-break/><text:span text:style-name="T4">24</text:span> And these <text:span text:style-name="T10">are</text:span> the children of Zibeon; both Ajah, and Anah: this <text:span text:style-name="T10">was that</text:span> Anah that found the mules in the wilderness, as he fed the asses of Zibeon his father. <text:line-break/><text:span text:style-name="T4">25</text:span> And the children of Anah <text:span text:style-name="T10">were</text:span> these; Dishon, and Aholibamah the daughter of Anah. <text:line-break/><text:span text:style-name="T4">26</text:span> And these <text:span text:style-name="T10">are</text:span> the children of Dishon; Hemdan, and Eshban, and Ithran, and Cheran. <text:line-break/><text:span text:style-name="T4">27</text:span> The children of Ezer <text:span text:style-name="T10">are</text:span> these; Bilhan, and Zaavan, and Akan. <text:line-break/><text:span text:style-name="T4">28</text:span> The children of <text:span text:style-name="T1">Dishan</text:span> <text:span text:style-name="T10">are</text:span> these; <text:span text:style-name="T6">Uz</text:span><text:span text:style-name="T11">H5780</text:span>, and Aran.</text:p>
          </table:table-cell>
        </table:table-row>
      </table:table>
      <text:p text:style-name="Text_20_body"/>
      <text:p text:style-name="Text_20_body"/>
      <table:table table:name="Table1" table:style-name="Table1">
        <table:table-column table:style-name="Table1.A"/>
        <table:table-row>
          <table:table-cell table:style-name="Table1.A1" office:value-type="string">
            <text:p text:style-name="P2">Job 42:9</text:p>
            <text:p text:style-name="P3">So Eliphaz the Temanite and Bildad the Shuhite and Zophar the Naamathite went, and did according as the LORD commanded them: the LORD also accepted Job.</text:p>
          </table:table-cell>
        </table:table-row>
      </table:table>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p text:style-name="P2">Job 32:2</text:p>
            <text:p text:style-name="P3">Then was kindled the wrath of Elihu<text:span text:style-name="T12">H453</text:span> the son of Barachel<text:span text:style-name="T13">H1292</text:span> the Buzite<text:span text:style-name="T14">H940 (H938)</text:span>, of the kindred of Ram<text:span text:style-name="T15">H7410</text:span>: against Job was his wrath kindled, because he justified himself rather than God.</text:p>
          </table:table-cell>
        </table:table-row>
      </table:table>
      <text:p text:style-name="Standard"/>
      <table:table table:name="Table3" table:style-name="Table3">
        <table:table-column table:style-name="Table3.A"/>
        <table:table-row>
          <table:table-cell table:style-name="Table3.A1" office:value-type="string">
            <text:p text:style-name="Table_20_Contents"><text:span text:style-name="T16">Ruth 4:18-22</text:span> <text:span text:style-name="T17">(</text:span><text:span text:style-name="T18">time period </text:span><text:span text:style-name="T19">of Ram</text:span><text:span text:style-name="T18">: </text:span><text:span text:style-name="T20">~</text:span><text:span text:style-name="T19">5 generations before </text:span><text:span text:style-name="T18">judges; </text:span><text:span text:style-name="T17">descendants of Judah</text:span><text:span text:style-name="T21">+Tamar</text:span><text:span text:style-name="T17">)</text:span><text:line-break/><text:span text:style-name="T4">18</text:span> Now these <text:span text:style-name="T10">are</text:span> the generations of Pharez: Pharez begat Hezron, <text:line-break/><text:span text:style-name="T4">19</text:span> And Hezron begat Ram<text:span text:style-name="T22">H7410</text:span>, and Ram<text:span text:style-name="T22">H7410</text:span> begat Amminadab, <text:line-break/><text:span text:style-name="T4">20</text:span> And Amminadab begat Nahshon, and Nahshon begat Salmon, <text:line-break/><text:span text:style-name="T4">21</text:span> And Salmon begat Boaz, and Boaz begat Obed, <text:line-break/><text:span text:style-name="T4">22</text:span> And Obed begat Jesse, and Jesse begat David.</text:p>
          </table:table-cell>
        </table:table-row>
      </table:table>
      <text:p text:style-name="Standard"/>
      <table:table table:name="Table4" table:style-name="Table4">
        <table:table-column table:style-name="Table4.A"/>
        <text:soft-page-break/>
        <table:table-row>
          <table:table-cell table:style-name="Table4.A1" office:value-type="string">
            <text:p text:style-name="P4">H938 (Buz)</text:p>
            <text:p text:style-name="P4"><text:line-break/><text:span text:style-name="T16">Genesis 22:20-23</text:span> <text:span text:style-name="T23">(a descendant of Abraham’s brother Nahor+Milcah)</text:span><text:line-break/><text:span text:style-name="T4">20</text:span> And it came to pass after these things, that it was told Abraham, saying, Behold, Milcah, she hath also born children unto thy brother <text:span text:style-name="T1">Nahor</text:span>;<text:line-break/><text:span text:style-name="T4">21</text:span> Huz his firstborn, and <text:span text:style-name="T1">Buz</text:span><text:span text:style-name="T24">H938</text:span> his brother, and Kemuel the father of Aram,<text:line-break/><text:span text:style-name="T4">22</text:span> And Chesed, and Hazo, and Pildash, and Jidlaph, and Bethuel.<text:line-break/><text:span text:style-name="T4">23</text:span> And Bethuel begat Rebekah: these eight Milcah did bear to Nahor, Abraham's brother.</text:p>
            <text:p text:style-name="P4"><text:line-break/><text:span text:style-name="T16">1 Chronicles 5:11-17</text:span> <text:span text:style-name="T25">(a descendant of Abraham→Isaac→Jacob) <text:s/></text:span><text:line-break/><text:span text:style-name="T4">11</text:span> And <text:span text:style-name="T1">the children of Gad</text:span> dwelt over against them, in the land of Bashan unto Salchah: <text:line-break/><text:span text:style-name="T4">12</text:span> Joel the chief, and Shapham the next, and Jaanai, and Shaphat in Bashan.<text:line-break/><text:span text:style-name="T4">13</text:span> And their brethren of the house of their fathers <text:span text:style-name="T10">were</text:span>, Michael, and Meshullam, and Sheba, and Jorai, and Jachan, and Zia, and Heber, seven.<text:line-break/><text:span text:style-name="T4">14</text:span> These <text:span text:style-name="T10">are</text:span> the children of Abihail the son of Huri, the son of Jaroah, the son of Gilead, the son of Michael, the son of Jeshishai, the son of Jahdo, the son of <text:span text:style-name="T1">Buz</text:span><text:span text:style-name="T26">H938</text:span>;<text:line-break/><text:span text:style-name="T4">15</text:span> Ahi the son of Abdiel, the son of Guni, chief of the house of their fathers.<text:line-break/><text:span text:style-name="T4">16</text:span> And they dwelt in Gilead in Bashan, and in her towns, and in all the suburbs of Sharon, upon their borders. <text:line-break/><text:span text:style-name="T4">17</text:span> All these were reckoned by genealogies in the days of Jotham king of Judah, and in the days of Jeroboam king of Israel.</text:p>
            <text:p text:style-name="P4"><text:line-break/><text:span text:style-name="T16">Jeremiah 25:18-26</text:span> <text:span text:style-name="T27">(</text:span><text:span text:style-name="T28">Dedan: a descendant of Cush, </text:span><text:span text:style-name="T29">Tema: a descendant of Ishmael, </text:span><text:span text:style-name="T30">Buz: ?another land in the utmost corners</text:span><text:span text:style-name="T27">)</text:span><text:line-break/><text:span text:style-name="T4">18</text:span> <text:span text:style-name="T10">To wit</text:span>, Jerusalem, and the cities of Judah, and the kings thereof, and the princes thereof, to make them a desolation, an astonishment, an hissing, and a curse; as <text:span text:style-name="T10">it is</text:span> this day; <text:line-break/><text:span text:style-name="T4">19</text:span> Pharaoh king of Egypt, and his servants, and his princes, and all his people; <text:line-break/><text:span text:style-name="T4">20</text:span> And all the mingled people, and all the kings of the land of Uz, and all the kings of the land of the Philistines, and Ashkelon, and Azzah, and Ekron, and the remnant of Ashdod, <text:line-break/><text:span text:style-name="T4">21</text:span> Edom, and Moab, and the children of Ammon, <text:line-break/><text:span text:style-name="T4">22</text:span> And all the kings of Tyrus, and all the kings of Zidon, and the kings of the isles which <text:span text:style-name="T10">are</text:span> beyond the sea, <text:line-break/><text:span text:style-name="T4">23</text:span> Dedan, and Tema, and <text:span text:style-name="T1">Buz</text:span><text:span text:style-name="T31">H938</text:span>, and <text:span text:style-name="T1">all </text:span><text:span text:style-name="T32">that</text:span><text:span text:style-name="T1"> </text:span><text:span text:style-name="T32">are</text:span><text:span text:style-name="T1"> in the utmost corners</text:span>, <text:line-break/><text:span text:style-name="T4">24</text:span> And all the kings of Arabia, and all the kings of the mingled people that dwell in the desert, <text:line-break/><text:span text:style-name="T4">25</text:span> And all the kings of Zimri, and all the kings of Elam, and all the kings of the Medes, <text:line-break/><text:span text:style-name="T4">26</text:span> And all the kings of the north, far and near, one with another, and all the kingdoms of the world, which <text:span text:style-name="T10">are</text:span> upon the face of the earth: and the king of Sheshach shall drink after them.</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30T12:40:33.428730300</meta:creation-date>
    <meta:editing-duration>PT40M59S</meta:editing-duration>
    <meta:editing-cycles>38</meta:editing-cycles>
    <meta:generator>LibreOffice/25.2.3.2$Windows_X86_64 LibreOffice_project/bbb074479178df812d175f709636b368952c2ce3</meta:generator>
    <dc:title>BibleStudyTemplate</dc:title>
    <dc:date>2025-06-02T15:12:03.349613100</dc:date>
    <meta:document-statistic meta:table-count="6" meta:image-count="0" meta:object-count="0" meta:page-count="2" meta:paragraph-count="13" meta:word-count="879" meta:character-count="4846" meta:non-whitespace-character-count="3947"/>
    <meta:template xlink:type="simple" xlink:actuate="onRequest" xlink:title="BibleStudyTemplate" xlink:href="../../../../AppData/Roaming/LibreOffice/4/user/template/BibleStudyTemplate.ott" meta:date="2025-05-30T12:40:32.938934100"/>
  </office:meta>
</office:document-meta>
</file>