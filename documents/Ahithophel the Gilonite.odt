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Gabriela_Nerd_Font_1.ttf" manifest:media-type="application/x-font-ttf"/>
  <manifest:file-entry manifest:full-path="Fonts/Font_Liberation_Sans_2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>
      <svg:font-face-src>
        <svg:font-face-uri xlink:href="Fonts/Font_Arial_4.ttf" xlink:type="simple" loext:font-style="normal" loext:font-weight="normal">
          <svg:font-face-format svg:string="truetype"/>
        </svg:font-face-uri>
      </svg:font-face-src>
    </style:font-face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53in" table:align="center"/>
    </style:style>
    <style:style style:name="Table1.A" style:family="table-column">
      <style:table-column-properties style:column-width="3.5528in"/>
    </style:style>
    <style:style style:name="Table1.B" style:family="table-column">
      <style:table-column-properties style:column-width="3.212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in" table:align="center"/>
    </style:style>
    <style:style style:name="Table3.A" style:family="table-column">
      <style:table-column-properties style:column-width="0.9083in"/>
    </style:style>
    <style:style style:name="Table3.B" style:family="table-column">
      <style:table-column-properties style:column-width="2.9153in"/>
    </style:style>
    <style:style style:name="Table3.C" style:family="table-column">
      <style:table-column-properties style:column-width="1.7639in"/>
    </style:style>
    <style:style style:name="Table3.D" style:family="table-column">
      <style:table-column-properties style:column-width="2.6125in"/>
    </style:style>
    <style:style style:name="Table3.A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13in" fo:border="0.05pt solid #000000"/>
    </style:style>
    <style:style style:name="Table3.A2" style:family="table-cell">
      <style:table-cell-properties style:vertical-align="middle" fo:padding="0.0313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4.041in" style:rel-column-width="32295*"/>
    </style:style>
    <style:style style:name="Table4.B" style:family="table-column">
      <style:table-column-properties style:column-width="4.159in" style:rel-column-width="33240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4.1in" style:rel-column-width="32767*"/>
    </style:style>
    <style:style style:name="Table5.B" style:family="table-column">
      <style:table-column-properties style:column-width="4.1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4.1in" style:rel-column-width="32767*"/>
    </style:style>
    <style:style style:name="Table6.B" style:family="table-column">
      <style:table-column-properties style:column-width="4.1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fo:font-size="12pt" officeooo:rsid="006d055e" officeooo:paragraph-rsid="006d055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0pt" officeooo:rsid="0082aed1" officeooo:paragraph-rsid="0082aed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officeooo:rsid="006d055e" officeooo:paragraph-rsid="006d055e" style:font-size-asian="12pt" style:font-size-complex="12pt"/>
    </style:style>
    <style:style style:name="P4" style:family="paragraph" style:parent-style-name="Table_20_Contents">
      <style:text-properties fo:color="#127622" loext:opacity="100%" style:font-name="Gabriela Nerd Font" fo:font-size="12pt" officeooo:paragraph-rsid="006cd32b" style:font-size-asian="12pt" style:font-size-complex="12pt"/>
    </style:style>
    <style:style style:name="P5" style:family="paragraph" style:parent-style-name="Table_20_Contents">
      <style:text-properties style:use-window-font-color="true" loext:opacity="0%" fo:font-size="12pt" officeooo:paragraph-rsid="006cd32b" style:font-size-asian="12pt" style:font-size-complex="12pt"/>
    </style:style>
    <style:style style:name="P6" style:family="paragraph" style:parent-style-name="Table_20_Contents">
      <style:text-properties fo:font-size="12pt" officeooo:paragraph-rsid="006cd32b" style:font-size-asian="12pt" style:font-size-complex="12pt"/>
    </style:style>
    <style:style style:name="P7" style:family="paragraph" style:parent-style-name="Table_20_Contents">
      <style:text-properties officeooo:paragraph-rsid="006cd32b"/>
    </style:style>
    <style:style style:name="P8" style:family="paragraph" style:parent-style-name="Standard">
      <style:text-properties style:font-name="Liberation Sans" fo:font-size="12pt" officeooo:paragraph-rsid="006cd32b" style:font-size-asian="12pt" style:font-size-complex="12pt"/>
    </style:style>
    <style:style style:name="P9" style:family="paragraph" style:parent-style-name="Standard" style:list-style-name="L1">
      <style:text-properties style:font-name="Liberation Sans" fo:font-size="12pt" officeooo:rsid="00aee5d2" officeooo:paragraph-rsid="00aee5d2" style:font-size-asian="12pt" style:font-size-complex="12pt"/>
    </style:style>
    <style:style style:name="P10" style:family="paragraph" style:parent-style-name="Standard" style:list-style-name="L1">
      <style:text-properties style:font-name="Liberation Sans" fo:font-size="12pt" officeooo:rsid="00bb2171" officeooo:paragraph-rsid="00bb2171" style:font-size-asian="12pt" style:font-size-complex="12pt"/>
    </style:style>
    <style:style style:name="P11" style:family="paragraph" style:parent-style-name="Standard" style:list-style-name="L1">
      <style:text-properties style:font-name="Liberation Sans" fo:font-size="12pt" officeooo:rsid="00257ddb" officeooo:paragraph-rsid="00bda8cc" style:font-size-asian="12pt" style:font-size-complex="12pt"/>
    </style:style>
    <style:style style:name="P12" style:family="paragraph" style:parent-style-name="Standard" style:list-style-name="L1">
      <style:text-properties officeooo:paragraph-rsid="00b1bd15"/>
    </style:style>
    <style:style style:name="P13" style:family="paragraph" style:parent-style-name="Standard" style:list-style-name="L1">
      <style:text-properties officeooo:paragraph-rsid="00c3b4f3"/>
    </style:style>
    <style:style style:name="P14" style:family="paragraph" style:parent-style-name="Standard" style:list-style-name="L1">
      <style:text-properties fo:color="#127622" loext:opacity="100%" style:font-name="Gabriela Nerd Font" fo:font-size="12pt" officeooo:rsid="00c8a34f" officeooo:paragraph-rsid="00c8a34f" style:font-size-asian="12pt" style:font-size-complex="12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d779fa"/>
    </style:style>
    <style:style style:name="P17" style:family="paragraph" style:parent-style-name="Standard" style:list-style-name="L1">
      <style:text-properties officeooo:rsid="00d779fa" officeooo:paragraph-rsid="00d779fa"/>
    </style:style>
    <style:style style:name="P18" style:family="paragraph" style:parent-style-name="Standard" style:list-style-name="L1">
      <style:text-properties officeooo:paragraph-rsid="00b38f00"/>
    </style:style>
    <style:style style:name="P19" style:family="paragraph" style:parent-style-name="Standard" style:list-style-name="L1">
      <style:text-properties style:font-name="Liberation Sans" fo:font-size="12pt" officeooo:rsid="00257ddb" officeooo:paragraph-rsid="00ac691c" style:font-size-asian="12pt" style:font-size-complex="12pt"/>
    </style:style>
    <style:style style:name="P20" style:family="paragraph" style:parent-style-name="Standard" style:list-style-name="L1">
      <style:text-properties officeooo:paragraph-rsid="00e73b9d"/>
    </style:style>
    <style:style style:name="P21" style:family="paragraph" style:parent-style-name="Standard" style:list-style-name="L1">
      <style:text-properties officeooo:paragraph-rsid="006cd32b"/>
    </style:style>
    <style:style style:name="P22" style:family="paragraph" style:parent-style-name="Standard" style:list-style-name="L1">
      <style:text-properties officeooo:rsid="00e9decc" officeooo:paragraph-rsid="00e9decc"/>
    </style:style>
    <style:style style:name="P23" style:family="paragraph" style:parent-style-name="Standard">
      <style:paragraph-properties fo:text-align="center" style:justify-single-word="false"/>
      <style:text-properties officeooo:paragraph-rsid="006cd32b"/>
    </style:style>
    <style:style style:name="P24" style:family="paragraph" style:parent-style-name="Standard">
      <style:paragraph-properties fo:text-align="center" style:justify-single-word="false"/>
      <style:text-properties officeooo:paragraph-rsid="0070a7fe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rsid="002c03b7" officeooo:paragraph-rsid="0070a7f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paragraph-rsid="0070a7fe"/>
    </style:style>
    <style:style style:name="P27" style:family="paragraph" style:parent-style-name="Table_20_Contents">
      <style:paragraph-properties fo:text-align="center" style:justify-single-word="false"/>
      <style:text-properties officeooo:rsid="00f3d05d" officeooo:paragraph-rsid="00f3d05d"/>
    </style:style>
    <style:style style:name="P28" style:family="paragraph" style:parent-style-name="Table_20_Contents">
      <style:paragraph-properties fo:text-align="center" style:justify-single-word="false"/>
      <style:text-properties fo:color="#127622" loext:opacity="100%" style:font-name="Gabriela Nerd Font" fo:font-size="12pt" officeooo:paragraph-rsid="006cd32b" style:font-size-asian="12pt" style:font-size-complex="12pt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70a7fe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3d05d" officeooo:paragraph-rsid="00f3d05d" style:font-size-asian="12pt" style:font-size-complex="12pt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144a4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66e44" officeooo:paragraph-rsid="00f66e44" style:font-size-asian="12pt" style:font-size-complex="12pt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02b27" officeooo:paragraph-rsid="0070a7fe" style:font-size-asian="12pt" style:font-size-complex="12pt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a3597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b6392" officeooo:paragraph-rsid="00fb6392" style:font-size-asian="12pt" style:font-size-complex="12pt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0acd38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c756a" officeooo:paragraph-rsid="015ed700" style:font-size-asian="12pt" style:font-size-complex="12pt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5ed700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rsid="016361a8" officeooo:paragraph-rsid="016361a8"/>
    </style:style>
    <style:style style:name="P40" style:family="paragraph" style:parent-style-name="Standard">
      <style:text-properties style:font-name="Liberation Sans" fo:font-size="12pt" officeooo:rsid="0026c075" officeooo:paragraph-rsid="0070a7fe" style:font-size-asian="12pt" style:font-size-complex="12pt"/>
    </style:style>
    <style:style style:name="P41" style:family="paragraph" style:parent-style-name="Standard">
      <style:paragraph-properties fo:break-before="page"/>
      <style:text-properties style:font-name="Liberation Sans" fo:font-size="12pt" officeooo:paragraph-rsid="003ebf3a" style:font-size-asian="12pt" style:font-size-complex="12pt"/>
    </style:style>
    <style:style style:name="P42" style:family="paragraph" style:parent-style-name="Standard">
      <style:text-properties style:font-name="Liberation Sans" fo:font-size="12pt" officeooo:rsid="003ebf3a" officeooo:paragraph-rsid="003ebf3a" style:font-size-asian="12pt" style:font-size-complex="12pt"/>
    </style:style>
    <style:style style:name="P43" style:family="paragraph" style:parent-style-name="Standard" style:list-style-name="L2">
      <style:text-properties fo:color="#127622" loext:opacity="100%" style:font-name="Gabriela Nerd Font"/>
    </style:style>
    <style:style style:name="P44" style:family="paragraph" style:parent-style-name="Standard" style:list-style-name="L3">
      <style:text-properties style:font-name="Liberation Sans" fo:font-size="12pt" officeooo:rsid="00408e65" officeooo:paragraph-rsid="0072d3e6" style:font-size-asian="12pt" style:font-size-complex="12pt"/>
    </style:style>
    <style:style style:name="P45" style:family="paragraph" style:parent-style-name="Standard" style:list-style-name="L3">
      <style:text-properties style:font-name="Liberation Sans" fo:font-size="12pt" officeooo:rsid="0096f556" officeooo:paragraph-rsid="0096f556" style:font-size-asian="12pt" style:font-size-complex="12pt"/>
    </style:style>
    <style:style style:name="P46" style:family="paragraph" style:parent-style-name="Standard" style:list-style-name="L3">
      <style:text-properties style:font-name="Liberation Sans" fo:font-size="12pt" officeooo:rsid="0091b3f6" officeooo:paragraph-rsid="00930ad3" style:font-size-asian="12pt" style:font-size-complex="12pt"/>
    </style:style>
    <style:style style:name="P47" style:family="paragraph" style:parent-style-name="Standard" style:list-style-name="L3">
      <style:text-properties style:font-name="Liberation Sans" fo:font-size="12pt" officeooo:rsid="00472a7e" officeooo:paragraph-rsid="0072d3e6" style:font-size-asian="12pt" style:font-size-complex="12pt"/>
    </style:style>
    <style:style style:name="P48" style:family="paragraph" style:parent-style-name="Standard" style:list-style-name="L3">
      <style:text-properties style:font-name="Liberation Sans" fo:font-size="12pt" officeooo:rsid="0091b3f6" officeooo:paragraph-rsid="00a1beb5" style:font-size-asian="12pt" style:font-size-complex="12pt"/>
    </style:style>
    <style:style style:name="P49" style:family="paragraph" style:parent-style-name="Standard" style:list-style-name="L3">
      <style:text-properties style:font-name="Liberation Sans" fo:font-size="12pt" officeooo:rsid="0049e334" officeooo:paragraph-rsid="0072d3e6" style:font-size-asian="12pt" style:font-size-complex="12pt"/>
    </style:style>
    <style:style style:name="P50" style:family="paragraph" style:parent-style-name="Standard" style:list-style-name="L3">
      <style:text-properties style:font-name="Liberation Sans" fo:font-size="12pt" officeooo:rsid="0058afb2" officeooo:paragraph-rsid="0058afb2" style:font-size-asian="12pt" style:font-size-complex="12pt"/>
    </style:style>
    <style:style style:name="P51" style:family="paragraph" style:parent-style-name="Standard" style:list-style-name="L3">
      <style:text-properties style:font-name="Liberation Sans" fo:font-size="12pt" officeooo:rsid="00961ea2" officeooo:paragraph-rsid="00961ea2" style:font-size-asian="12pt" style:font-size-complex="12pt"/>
    </style:style>
    <style:style style:name="P52" style:family="paragraph" style:parent-style-name="Standard" style:list-style-name="L3">
      <style:text-properties style:font-name="Liberation Sans" fo:font-size="12pt" officeooo:rsid="00986528" officeooo:paragraph-rsid="00986528" style:font-size-asian="12pt" style:font-size-complex="12pt"/>
    </style:style>
    <style:style style:name="P53" style:family="paragraph" style:parent-style-name="Standard">
      <style:text-properties style:font-name="Liberation Sans" fo:font-size="12pt" officeooo:rsid="00472a7e" officeooo:paragraph-rsid="00472a7e" style:font-size-asian="12pt" style:font-size-complex="12pt"/>
    </style:style>
    <style:style style:name="P54" style:family="paragraph" style:parent-style-name="Standard">
      <style:text-properties style:font-name="Liberation Sans" fo:font-size="12pt" officeooo:rsid="0049602f" officeooo:paragraph-rsid="0049602f" style:font-size-asian="12pt" style:font-size-complex="12pt"/>
    </style:style>
    <style:style style:name="P55" style:family="paragraph" style:parent-style-name="Table_20_Contents">
      <style:text-properties fo:font-size="12pt" officeooo:rsid="0049e334" officeooo:paragraph-rsid="0049e334" style:font-size-asian="12pt" style:font-size-complex="12pt"/>
    </style:style>
    <style:style style:name="P56" style:family="paragraph" style:parent-style-name="Table_20_Contents">
      <style:text-properties fo:font-size="12pt" officeooo:rsid="004f595d" officeooo:paragraph-rsid="004f595d" style:font-size-asian="12pt" style:font-size-complex="12pt"/>
    </style:style>
    <style:style style:name="P57" style:family="paragraph" style:parent-style-name="Table_20_Contents">
      <style:text-properties fo:font-size="12pt" officeooo:rsid="004f595d" officeooo:paragraph-rsid="0050d877" style:font-size-asian="12pt" style:font-size-complex="12pt"/>
    </style:style>
    <style:style style:name="P58" style:family="paragraph" style:parent-style-name="Table_20_Contents">
      <style:text-properties fo:font-size="12pt" officeooo:rsid="00533d75" officeooo:paragraph-rsid="00533d75" style:font-size-asian="12pt" style:font-size-complex="12pt"/>
    </style:style>
    <style:style style:name="P59" style:family="paragraph" style:parent-style-name="Standard">
      <style:text-properties style:font-name="Liberation Sans" fo:font-size="12pt" officeooo:rsid="0064e0a3" officeooo:paragraph-rsid="0064e0a3" style:font-size-asian="12pt" style:font-size-complex="12pt"/>
    </style:style>
    <style:style style:name="P60" style:family="paragraph" style:parent-style-name="Standard">
      <style:text-properties officeooo:paragraph-rsid="007400cc"/>
    </style:style>
    <style:style style:name="P61" style:family="paragraph" style:parent-style-name="Standard" style:list-style-name="L4">
      <style:text-properties officeooo:rsid="0078b711" officeooo:paragraph-rsid="0078b711"/>
    </style:style>
    <style:style style:name="P62" style:family="paragraph" style:parent-style-name="Standard" style:list-style-name="L4">
      <style:text-properties officeooo:paragraph-rsid="007aa750"/>
    </style:style>
    <style:style style:name="P63" style:family="paragraph" style:parent-style-name="Standard" style:list-style-name="L4">
      <style:text-properties officeooo:rsid="007400cc" officeooo:paragraph-rsid="007400cc"/>
    </style:style>
    <style:style style:name="P64" style:family="paragraph" style:parent-style-name="Standard">
      <style:text-properties officeooo:rsid="007400cc" officeooo:paragraph-rsid="007400cc"/>
    </style:style>
    <style:style style:name="P65" style:family="paragraph" style:parent-style-name="Table_20_Contents">
      <style:paragraph-properties fo:text-align="center" style:justify-single-word="false"/>
      <style:text-properties officeooo:rsid="00741238" officeooo:paragraph-rsid="00741238"/>
    </style:style>
    <style:style style:name="P66" style:family="paragraph" style:parent-style-name="Table_20_Contents">
      <style:text-properties officeooo:rsid="00741238" officeooo:paragraph-rsid="00741238"/>
    </style:style>
    <style:style style:name="P67" style:family="paragraph" style:parent-style-name="Table_20_Contents">
      <style:paragraph-properties fo:text-align="center" style:justify-single-word="false"/>
      <style:text-properties officeooo:rsid="007463db" officeooo:paragraph-rsid="007463db"/>
    </style:style>
    <style:style style:name="P68" style:family="paragraph" style:parent-style-name="Table_20_Contents">
      <style:text-properties officeooo:rsid="007463db" officeooo:paragraph-rsid="007463db"/>
    </style:style>
    <style:style style:name="T1" style:family="text">
      <style:text-properties officeooo:rsid="00a734af"/>
    </style:style>
    <style:style style:name="T2" style:family="text">
      <style:text-properties fo:background-color="#ffb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d8ce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#dde8cb" loext:char-shading-value="0"/>
    </style:style>
    <style:style style:name="T8" style:family="text">
      <style:text-properties officeooo:rsid="00c20a3d"/>
    </style:style>
    <style:style style:name="T9" style:family="text">
      <style:text-properties officeooo:rsid="00c217ef"/>
    </style:style>
    <style:style style:name="T10" style:family="text">
      <style:text-properties officeooo:rsid="00e0ff8d"/>
    </style:style>
    <style:style style:name="T11" style:family="text">
      <style:text-properties officeooo:rsid="00bda8cc"/>
    </style:style>
    <style:style style:name="T12" style:family="text">
      <style:text-properties officeooo:rsid="00ac691c"/>
    </style:style>
    <style:style style:name="T13" style:family="text">
      <style:text-properties fo:color="#127622" loext:opacity="100%" style:font-name="Gabriela Nerd Font" fo:font-size="12pt" style:font-size-asian="12pt" style:font-size-complex="12pt"/>
    </style:style>
    <style:style style:name="T14" style:family="text">
      <style:text-properties fo:color="#127622" loext:opacity="100%" style:font-name="Gabriela Nerd Font" fo:font-size="12pt" officeooo:rsid="00dd7f8f" style:font-size-asian="12pt" style:font-size-complex="12pt"/>
    </style:style>
    <style:style style:name="T15" style:family="text">
      <style:text-properties fo:color="#127622" loext:opacity="100%" style:font-name="Gabriela Nerd Font" fo:font-size="12pt" officeooo:rsid="00c3b4f3" style:font-size-asian="12pt" style:font-size-complex="12pt"/>
    </style:style>
    <style:style style:name="T16" style:family="text">
      <style:text-properties style:font-name="Liberation Sans" fo:font-size="12pt" officeooo:rsid="00ac691c" style:font-size-asian="12pt" style:font-size-complex="12pt"/>
    </style:style>
    <style:style style:name="T17" style:family="text">
      <style:text-properties style:font-name="Liberation Sans" fo:font-size="12pt" officeooo:rsid="00366105" style:font-size-asian="12pt" style:font-size-complex="12pt"/>
    </style:style>
    <style:style style:name="T18" style:family="text">
      <style:text-properties style:font-name="Liberation Sans" fo:font-size="12pt" officeooo:rsid="00c3b4f3" style:font-size-asian="12pt" style:font-size-complex="12pt"/>
    </style:style>
    <style:style style:name="T19" style:family="text">
      <style:text-properties style:font-name="Liberation Sans" fo:font-size="12pt" officeooo:rsid="00c564f9" style:font-size-asian="12pt" style:font-size-complex="12pt"/>
    </style:style>
    <style:style style:name="T20" style:family="text">
      <style:text-properties fo:color="#ff0000" loext:opacity="100%"/>
    </style:style>
    <style:style style:name="T21" style:family="text">
      <style:text-properties officeooo:rsid="00d37cf7"/>
    </style:style>
    <style:style style:name="T22" style:family="text">
      <style:text-properties officeooo:rsid="00c8a34f"/>
    </style:style>
    <style:style style:name="T23" style:family="text">
      <style:text-properties officeooo:rsid="00cb0f7c"/>
    </style:style>
    <style:style style:name="T24" style:family="text">
      <style:text-properties style:font-name="Liberation Sans" fo:font-size="12pt" officeooo:rsid="00354b62" style:font-size-asian="12pt" style:font-size-complex="12pt"/>
    </style:style>
    <style:style style:name="T25" style:family="text">
      <style:text-properties style:font-name="Liberation Sans" fo:font-size="12pt" officeooo:rsid="00d779fa" style:font-size-asian="12pt" style:font-size-complex="12pt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font-name="Liberation Sans" fo:font-size="12pt" officeooo:rsid="00e0ff8d" style:font-size-asian="12pt" style:font-size-complex="12pt"/>
    </style:style>
    <style:style style:name="T28" style:family="text">
      <style:text-properties style:font-name="Liberation Sans" fo:font-size="12pt" officeooo:rsid="00d83994" style:font-size-asian="12pt" style:font-size-complex="12pt"/>
    </style:style>
    <style:style style:name="T29" style:family="text">
      <style:text-properties style:font-name="Liberation Sans" fo:font-size="12pt" officeooo:rsid="00dbb3ed" style:font-size-asian="12pt" style:font-size-complex="12pt"/>
    </style:style>
    <style:style style:name="T30" style:family="text">
      <style:text-properties style:font-name="Liberation Sans" fo:font-size="12pt" officeooo:rsid="00b38f00" style:font-size-asian="12pt" style:font-size-complex="12pt"/>
    </style:style>
    <style:style style:name="T31" style:family="text">
      <style:text-properties style:font-name="Liberation Sans" fo:font-size="12pt" officeooo:rsid="00b47c4c" style:font-size-asian="12pt" style:font-size-complex="12pt"/>
    </style:style>
    <style:style style:name="T32" style:family="text">
      <style:text-properties officeooo:rsid="00b47c4c"/>
    </style:style>
    <style:style style:name="T33" style:family="text">
      <style:text-properties officeooo:rsid="00e1c868"/>
    </style:style>
    <style:style style:name="T34" style:family="text">
      <style:text-properties fo:color="#127622" loext:opacity="100%" style:font-name="Gabriela Nerd Font" officeooo:rsid="00e1c868"/>
    </style:style>
    <style:style style:name="T35" style:family="text">
      <style:text-properties style:font-name="Liberation Sans" fo:font-size="12pt" officeooo:rsid="00bda8cc" style:font-size-asian="12pt" style:font-size-complex="12pt"/>
    </style:style>
    <style:style style:name="T36" style:family="text">
      <style:text-properties style:font-name="Liberation Sans" fo:font-size="12pt" officeooo:rsid="00bf1df9" fo:background-color="#dde8cb" loext:char-shading-value="0" style:font-size-asian="12pt" style:font-size-complex="12pt"/>
    </style:style>
    <style:style style:name="T37" style:family="text">
      <style:text-properties style:font-name="Liberation Sans" fo:font-size="12pt" officeooo:rsid="00bf1df9" style:font-size-asian="12pt" style:font-size-complex="12pt"/>
    </style:style>
    <style:style style:name="T38" style:family="text">
      <style:text-properties style:font-name="Liberation Sans" fo:font-size="12pt" officeooo:rsid="00c0a25c" style:font-size-asian="12pt" style:font-size-complex="12pt"/>
    </style:style>
    <style:style style:name="T39" style:family="text">
      <style:text-properties style:font-name="Liberation Sans" fo:font-size="12pt" officeooo:rsid="00bf1df9" fo:background-color="#ffff00" loext:char-shading-value="0" style:font-size-asian="12pt" style:font-size-complex="12pt"/>
    </style:style>
    <style:style style:name="T40" style:family="text">
      <style:text-properties style:font-name="Liberation Sans" fo:font-size="12pt" officeooo:rsid="015501ca" style:font-size-asian="12pt" style:font-size-complex="12pt"/>
    </style:style>
    <style:style style:name="T41" style:family="text">
      <style:text-properties style:font-name="Liberation Sans" fo:font-size="12pt" officeooo:rsid="00e6d987" style:font-size-asian="12pt" style:font-size-complex="12pt"/>
    </style:style>
    <style:style style:name="T42" style:family="text">
      <style:text-properties style:font-name="Liberation Sans" fo:font-size="12pt" officeooo:rsid="00bda8cc" fo:background-color="#ffd8ce" loext:char-shading-value="0" style:font-size-asian="12pt" style:font-size-complex="12pt"/>
    </style:style>
    <style:style style:name="T43" style:family="text">
      <style:text-properties style:font-name="Liberation Sans" fo:font-size="12pt" officeooo:rsid="00bda8cc" fo:background-color="#b4c7dc" loext:char-shading-value="0" style:font-size-asian="12pt" style:font-size-complex="12pt"/>
    </style:style>
    <style:style style:name="T44" style:family="text">
      <style:text-properties style:font-name="Liberation Sans" fo:font-size="12pt" officeooo:rsid="00e2c7e4" style:font-size-asian="12pt" style:font-size-complex="12pt"/>
    </style:style>
    <style:style style:name="T45" style:family="text">
      <style:text-properties fo:color="#127622" loext:opacity="100%" style:font-name="Gabriela Nerd Font" fo:font-size="12pt" officeooo:rsid="00e4bd53" style:font-size-asian="12pt" style:font-size-complex="12pt"/>
    </style:style>
    <style:style style:name="T46" style:family="text">
      <style:text-properties style:font-name="Liberation Sans" fo:font-size="12pt" officeooo:rsid="00395172" style:font-size-asian="12pt" style:font-size-complex="12pt"/>
    </style:style>
    <style:style style:name="T47" style:family="text">
      <style:text-properties style:font-name="Liberation Sans" fo:font-size="12pt" officeooo:rsid="006fe9df" style:font-size-asian="12pt" style:font-size-complex="12pt"/>
    </style:style>
    <style:style style:name="T48" style:family="text">
      <style:text-properties style:font-name="Liberation Sans" fo:font-size="12pt" officeooo:rsid="00395172" fo:background-color="#ffd8ce" loext:char-shading-value="0" style:font-size-asian="12pt" style:font-size-complex="12pt"/>
    </style:style>
    <style:style style:name="T49" style:family="text">
      <style:text-properties style:font-name="Liberation Sans" fo:font-size="12pt" officeooo:rsid="00e8de9b" style:font-size-asian="12pt" style:font-size-complex="12pt"/>
    </style:style>
    <style:style style:name="T50" style:family="text">
      <style:text-properties style:font-name="Liberation Sans" fo:font-size="12pt" officeooo:rsid="00e9decc" style:font-size-asian="12pt" style:font-size-complex="12pt"/>
    </style:style>
    <style:style style:name="T51" style:family="text">
      <style:text-properties style:font-name="Liberation Sans" fo:font-size="12pt" officeooo:rsid="00ede7f0" style:font-size-asian="12pt" style:font-size-complex="12pt"/>
    </style:style>
    <style:style style:name="T52" style:family="text">
      <style:text-properties style:font-name="Liberation Sans" fo:font-size="12pt" officeooo:rsid="014d1de8" style:font-size-asian="12pt" style:font-size-complex="12pt"/>
    </style:style>
    <style:style style:name="T53" style:family="text">
      <style:text-properties style:font-name="Liberation Sans" fo:font-size="12pt" officeooo:rsid="014ba16f" style:font-size-asian="12pt" style:font-size-complex="12pt"/>
    </style:style>
    <style:style style:name="T54" style:family="text">
      <style:text-properties style:text-position="super 58%" style:font-name="Liberation Sans" fo:font-size="12pt" officeooo:rsid="014ba16f" style:font-size-asian="12pt" style:font-size-complex="12pt"/>
    </style:style>
    <style:style style:name="T55" style:family="text">
      <style:text-properties officeooo:rsid="014d1de8"/>
    </style:style>
    <style:style style:name="T56" style:family="text">
      <style:text-properties officeooo:rsid="014ba16f"/>
    </style:style>
    <style:style style:name="T57" style:family="text">
      <style:text-properties style:text-position="super 58%" officeooo:rsid="014ba16f"/>
    </style:style>
    <style:style style:name="T58" style:family="text">
      <style:text-properties style:font-name="Liberation Sans" fo:font-size="12pt" officeooo:rsid="014e8e04" style:font-size-asian="12pt" style:font-size-complex="12pt"/>
    </style:style>
    <style:style style:name="T59" style:family="text">
      <style:text-properties style:font-name="Liberation Sans" fo:font-size="12pt" officeooo:rsid="014f7719" style:font-size-asian="12pt" style:font-size-complex="12pt"/>
    </style:style>
    <style:style style:name="T60" style:family="text">
      <style:text-properties style:font-name="Liberation Sans" fo:font-size="12pt" fo:background-color="#b4c7dc" loext:char-shading-value="0" style:font-size-asian="12pt" style:font-size-complex="12pt"/>
    </style:style>
    <style:style style:name="T61" style:family="text">
      <style:text-properties style:font-name="Liberation Sans" fo:font-size="12pt" officeooo:rsid="002a9b85" style:font-size-asian="12pt" style:font-size-complex="12pt"/>
    </style:style>
    <style:style style:name="T62" style:family="text">
      <style:text-properties style:font-name="Liberation Sans" fo:font-size="12pt" officeooo:rsid="01564aa5" style:font-size-asian="12pt" style:font-size-complex="12pt"/>
    </style:style>
    <style:style style:name="T63" style:family="text">
      <style:text-properties officeooo:rsid="007264d4"/>
    </style:style>
    <style:style style:name="T64" style:family="text"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65" style:family="text">
      <style:text-properties style:text-position="super 58%"/>
    </style:style>
    <style:style style:name="T66" style:family="text">
      <style:text-properties fo:font-variant="normal" fo:text-transform="none" style:font-name="Liberation Sans" fo:font-size="12pt" fo:font-style="normal" fo:font-weight="normal" officeooo:rsid="014154b5" style:font-size-asian="12pt" style:font-size-complex="12pt"/>
    </style:style>
    <style:style style:name="T67" style:family="text">
      <style:text-properties fo:font-variant="normal" fo:text-transform="none" style:font-name="Liberation Sans" fo:font-size="12pt" fo:font-style="normal" fo:font-weight="normal" officeooo:rsid="0133749d" style:font-size-asian="12pt" style:font-size-complex="12pt"/>
    </style:style>
    <style:style style:name="T68" style:family="text">
      <style:text-properties fo:font-variant="normal" fo:text-transform="none" style:font-name="Liberation Sans" fo:font-size="12pt" fo:font-style="normal" fo:font-weight="normal" officeooo:rsid="013af1a3" style:font-size-asian="12pt" style:font-size-complex="12pt"/>
    </style:style>
    <style:style style:name="T69" style:family="text">
      <style:text-properties fo:font-variant="normal" fo:text-transform="none" style:font-name="Liberation Sans" fo:font-size="12pt" fo:font-style="normal" fo:font-weight="normal" officeooo:rsid="013f74a7" style:font-size-asian="12pt" style:font-size-complex="12pt"/>
    </style:style>
    <style:style style:name="T70" style:family="text">
      <style:text-properties fo:font-variant="normal" fo:text-transform="none" style:font-name="Liberation Sans" fo:font-size="12pt" fo:font-style="normal" fo:font-weight="normal" officeooo:rsid="013cbe56" style:font-size-asian="12pt" style:font-size-complex="12pt"/>
    </style:style>
    <style:style style:name="T71" style:family="text">
      <style:text-properties fo:font-variant="normal" fo:text-transform="none" style:font-name="Liberation Sans" fo:font-size="12pt" fo:font-style="normal" fo:font-weight="normal" officeooo:rsid="01345a1c" style:font-size-asian="12pt" style:font-size-complex="12pt"/>
    </style:style>
    <style:style style:name="T72" style:family="text">
      <style:text-properties fo:color="#127622" loext:opacity="100%" style:font-name="Gabriela Nerd Font" fo:font-size="12pt" officeooo:rsid="013a6003" style:font-size-asian="12pt" style:font-size-complex="12pt"/>
    </style:style>
    <style:style style:name="T73" style:family="text">
      <style:text-properties fo:font-variant="normal" fo:text-transform="none" style:font-name="Liberation Sans" fo:font-size="12pt" fo:font-style="normal" fo:font-weight="normal" officeooo:rsid="00f9b026" style:font-size-asian="12pt" style:font-size-complex="12pt"/>
    </style:style>
    <style:style style:name="T74" style:family="text">
      <style:text-properties officeooo:rsid="00f80865"/>
    </style:style>
    <style:style style:name="T75" style:family="text">
      <style:text-properties officeooo:rsid="01370d9e"/>
    </style:style>
    <style:style style:name="T76" style:family="text">
      <style:text-properties officeooo:rsid="003ac233"/>
    </style:style>
    <style:style style:name="T77" style:family="text">
      <style:text-properties officeooo:rsid="0102441d"/>
    </style:style>
    <style:style style:name="T78" style:family="text">
      <style:text-properties officeooo:rsid="010513d5"/>
    </style:style>
    <style:style style:name="T79" style:family="text">
      <style:text-properties officeooo:rsid="01070d9b"/>
    </style:style>
    <style:style style:name="T80" style:family="text">
      <style:text-properties officeooo:rsid="011220bf"/>
    </style:style>
    <style:style style:name="T81" style:family="text">
      <style:text-properties officeooo:rsid="01413660"/>
    </style:style>
    <style:style style:name="T82" style:family="text">
      <style:text-properties officeooo:rsid="01084043"/>
    </style:style>
    <style:style style:name="T83" style:family="text">
      <style:text-properties officeooo:rsid="010558ab"/>
    </style:style>
    <style:style style:name="T84" style:family="text">
      <style:text-properties officeooo:rsid="0139097c"/>
    </style:style>
    <style:style style:name="T85" style:family="text">
      <style:text-properties officeooo:rsid="0145c43b"/>
    </style:style>
    <style:style style:name="T86" style:family="text">
      <style:text-properties fo:font-variant="normal" fo:text-transform="none" style:font-name="Liberation Sans" fo:font-size="12pt" fo:font-style="normal" fo:font-weight="normal" officeooo:rsid="010acd38" style:font-size-asian="12pt" style:font-size-complex="12pt"/>
    </style:style>
    <style:style style:name="T87" style:family="text">
      <style:text-properties fo:font-variant="normal" fo:text-transform="none" style:font-name="Liberation Sans" fo:font-size="12pt" fo:font-style="normal" fo:font-weight="normal" officeooo:rsid="010f378c" style:font-size-asian="12pt" style:font-size-complex="12pt"/>
    </style:style>
    <style:style style:name="T88" style:family="text">
      <style:text-properties officeooo:rsid="01281e70"/>
    </style:style>
    <style:style style:name="T89" style:family="text">
      <style:text-properties officeooo:rsid="010bae15"/>
    </style:style>
    <style:style style:name="T90" style:family="text">
      <style:text-properties officeooo:rsid="01272cc6"/>
    </style:style>
    <style:style style:name="T91" style:family="text">
      <style:text-properties officeooo:rsid="010d4508"/>
    </style:style>
    <style:style style:name="T92" style:family="text">
      <style:text-properties officeooo:rsid="015c67d4"/>
    </style:style>
    <style:style style:name="T93" style:family="text">
      <style:text-properties officeooo:rsid="015bb9c0"/>
    </style:style>
    <style:style style:name="T94" style:family="text">
      <style:text-properties fo:font-variant="normal" fo:text-transform="none" style:font-name="Liberation Sans" fo:font-size="12pt" fo:font-style="normal" fo:font-weight="normal" officeooo:rsid="015d144c" style:font-size-asian="12pt" style:font-size-complex="12pt"/>
    </style:style>
    <style:style style:name="T95" style:family="text">
      <style:text-properties fo:font-variant="normal" fo:text-transform="none" style:font-name="Liberation Sans" fo:font-size="12pt" fo:font-style="normal" fo:font-weight="normal" officeooo:rsid="0129015e" style:font-size-asian="12pt" style:font-size-complex="12pt"/>
    </style:style>
    <style:style style:name="T96" style:family="text">
      <style:text-properties fo:font-variant="normal" fo:text-transform="none" style:font-name="Liberation Sans" fo:font-size="12pt" fo:font-style="normal" fo:font-weight="normal" officeooo:rsid="0160fede" style:font-size-asian="12pt" style:font-size-complex="12pt"/>
    </style:style>
    <style:style style:name="T97" style:family="text">
      <style:text-properties fo:font-variant="normal" fo:text-transform="none" style:font-name="Liberation Sans" fo:font-size="12pt" fo:font-style="normal" fo:font-weight="normal" officeooo:rsid="016276ab" style:font-size-asian="12pt" style:font-size-complex="12pt"/>
    </style:style>
    <style:style style:name="T98" style:family="text">
      <style:text-properties fo:font-variant="normal" fo:text-transform="none" style:font-name="Liberation Sans" fo:font-size="12pt" fo:font-style="normal" fo:font-weight="normal" officeooo:rsid="01644c6a" style:font-size-asian="12pt" style:font-size-complex="12pt"/>
    </style:style>
    <style:style style:name="T99" style:family="text">
      <style:text-properties officeooo:rsid="01509f3e"/>
    </style:style>
    <style:style style:name="T100" style:family="text">
      <style:text-properties officeooo:rsid="003ebf3a"/>
    </style:style>
    <style:style style:name="T101" style:family="text">
      <style:text-properties officeooo:rsid="009110ac"/>
    </style:style>
    <style:style style:name="T102" style:family="text">
      <style:text-properties officeooo:rsid="00930ad3"/>
    </style:style>
    <style:style style:name="T103" style:family="text">
      <style:text-properties officeooo:rsid="009ff6a4"/>
    </style:style>
    <style:style style:name="T104" style:family="text">
      <style:text-properties officeooo:rsid="00579879"/>
    </style:style>
    <style:style style:name="T105" style:family="text">
      <style:text-properties officeooo:rsid="005a2e9e"/>
    </style:style>
    <style:style style:name="T106" style:family="text">
      <style:text-properties officeooo:rsid="005d3e03"/>
    </style:style>
    <style:style style:name="T107" style:family="text">
      <style:text-properties officeooo:rsid="005adc4e"/>
    </style:style>
    <style:style style:name="T108" style:family="text">
      <style:text-properties officeooo:rsid="005c80dc"/>
    </style:style>
    <style:style style:name="T109" style:family="text">
      <style:text-properties officeooo:rsid="0096f556"/>
    </style:style>
    <style:style style:name="T110" style:family="text">
      <style:text-properties officeooo:rsid="0050d877"/>
    </style:style>
    <style:style style:name="T111" style:family="text">
      <style:text-properties officeooo:rsid="006bc41e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67c39b" style:font-style-asian="normal" style:font-style-complex="normal"/>
    </style:style>
    <style:style style:name="T115" style:family="text">
      <style:text-properties fo:font-style="normal" officeooo:rsid="007400cc" style:font-style-asian="normal" style:font-style-complex="normal"/>
    </style:style>
    <style:style style:name="T116" style:family="text">
      <style:text-properties fo:font-style="normal" officeooo:rsid="007d5ac2" style:font-style-asian="normal" style:font-style-complex="normal"/>
    </style:style>
    <style:style style:name="T117" style:family="text">
      <style:text-properties fo:font-style="normal" officeooo:rsid="007dbad5" style:font-style-asian="normal" style:font-style-complex="normal"/>
    </style:style>
    <style:style style:name="T118" style:family="text">
      <style:text-properties fo:color="#127622" loext:opacity="100%" style:font-name="Gabriela Nerd Font"/>
    </style:style>
    <style:style style:name="T119" style:family="text">
      <style:text-properties fo:font-style="normal" officeooo:rsid="007aa750" style:font-style-asian="normal" style:font-style-complex="normal"/>
    </style:style>
    <style:style style:name="T120" style:family="text">
      <style:text-properties fo:font-style="normal" officeooo:rsid="007ad898" style:font-style-asian="normal" style:font-style-complex="normal"/>
    </style:style>
    <style:style style:name="T121" style:family="text">
      <style:text-properties fo:font-style="normal" officeooo:rsid="007b01a1" style:font-style-asian="normal" style:font-style-complex="normal"/>
    </style:style>
    <style:style style:name="T122" style:family="text">
      <style:text-properties fo:font-style="normal" officeooo:rsid="007c4135" style:font-style-asian="normal" style:font-style-complex="normal"/>
    </style:style>
    <style:style style:name="T123" style:family="text">
      <style:text-properties fo:font-style="normal" officeooo:rsid="007e0d66" style:font-style-asian="normal" style:font-style-complex="normal"/>
    </style:style>
    <style:style style:name="T124" style:family="text">
      <style:text-properties fo:font-style="normal" officeooo:rsid="00741238" style:font-style-asian="normal" style:font-style-complex="normal"/>
    </style:style>
    <style:style style:name="T125" style:family="text">
      <style:text-properties fo:font-style="normal" officeooo:rsid="007fe7be" style:font-style-asian="normal" style:font-style-complex="normal"/>
    </style:style>
    <style:style style:name="T126" style:family="text">
      <style:text-properties officeooo:rsid="0077d3a5"/>
    </style:style>
    <style:style style:name="T127" style:family="text">
      <style:text-properties officeooo:rsid="0075e9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s Ahithophel related to Bath-sheba?</text:p>
      <text:p text:style-name="P2">Acts 17:11, <text:span text:style-name="T1">1Th 5:21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2 Samuel 11:3</text:p>
            <text:p text:style-name="P5">And <text:span text:style-name="T2">David</text:span> sent and enquired after <text:span text:style-name="T3">the woman</text:span>. And one said, Is not this <text:span text:style-name="T3">Bath-sheba</text:span>, <text:span text:style-name="T3">the daughter</text:span> of <text:span text:style-name="T4">Eliam</text:span>, the wife of Uriah the Hittite?</text:p>
          </table:table-cell>
          <table:covered-table-cell/>
        </table:table-row>
        <table:table-row>
          <table:table-cell table:style-name="Table1.A2" office:value-type="string">
            <text:p text:style-name="P4">2 Samuel 12:24</text:p>
            <text:p text:style-name="P6">And <text:span text:style-name="T2">David</text:span> comforted <text:span text:style-name="T3">Bath-sheba his wife</text:span>, and went in unto her, and lay with <text:span text:style-name="T5">her</text:span>: and she bare a son, and <text:span text:style-name="T5">he</text:span> called his name Solomon: and the LORD loved him.</text:p>
          </table:table-cell>
          <table:table-cell table:style-name="Table1.B2" office:value-type="string">
            <text:p text:style-name="P4">1 Chronicles 3:5</text:p>
            <text:p text:style-name="P6">And these were born unto <text:span text:style-name="T2">him</text:span> in Jerusalem; Shimea, and Shobab, and Nathan, and Solomon, four, of <text:span text:style-name="T3">Bath-shua</text:span><text:span text:style-name="T5"> </text:span><text:span text:style-name="T3">the daughter</text:span><text:span text:style-name="T5"> of </text:span><text:span text:style-name="T6">Ammiel</text:span>:</text:p>
          </table:table-cell>
        </table:table-row>
        <table:table-row>
          <table:table-cell table:style-name="Table1.B2" table:number-columns-spanned="2" office:value-type="string">
            <text:p text:style-name="P4">2 Samuel 23:34</text:p>
            <text:p text:style-name="P7">Eliphelet the son of Ahasbai, the son of the Maachathite, <text:span text:style-name="T4">Eliam</text:span> the son of <text:span text:style-name="T7">Ahithophel</text:span> the Gilonite,</text:p>
          </table:table-cell>
          <table:covered-table-cell/>
        </table:table-row>
      </table:table>
      <text:p text:style-name="P8"/>
      <text:list text:style-name="L1">
        <text:list-item>
          <text:p text:style-name="P9">From the scripture above the following conditions are set forth <text:span text:style-name="T8">for their </text:span><text:span text:style-name="T9">kinship</text:span>:</text:p>
          <text:list>
            <text:list-item>
              <text:p text:style-name="P9"><text:span text:style-name="T3">Bathsheba</text:span> is the daughter of <text:span text:style-name="T4">Eliam</text:span></text:p>
            </text:list-item>
            <text:list-item>
              <text:p text:style-name="P9"><text:span text:style-name="T3">Bathsheba</text:span> is the daughter of <text:span text:style-name="T6">Ammiel</text:span></text:p>
            </text:list-item>
            <text:list-item>
              <text:p text:style-name="P9"><text:span text:style-name="T4">Eliam</text:span> is the son of <text:span text:style-name="T7">Ahithophel</text:span></text:p>
            </text:list-item>
          </text:list>
        </text:list-item>
        <text:list-item>
          <text:p text:style-name="P10">So, in order to figure out more precisely how <text:span text:style-name="T3">Bathsheba</text:span> and <text:span text:style-name="T7">Ahithophel</text:span> are related it is crucial that we <text:span text:style-name="T10">first </text:span>learn how they <text:span text:style-name="T10">are </text:span>both related to both <text:span text:style-name="T4">Eliam</text:span> and <text:span text:style-name="T6">Ammiel</text:span>.</text:p>
        </text:list-item>
        <text:list-item>
          <text:p text:style-name="P11">It is plainly evident from all of scripture that when it reads “the son of” or “the daughter of” it does not necessitate that one is the direct descendant of another.</text:p>
          <text:list>
            <text:list-item>
              <text:p text:style-name="P11"><text:span text:style-name="T11">F</text:span><text:span text:style-name="T12">or example:</text:span></text:p>
              <text:list>
                <text:list-item>
                  <text:p text:style-name="P12"><text:span text:style-name="T13">1K</text:span><text:span text:style-name="T14">i</text:span><text:span text:style-name="T13"> 15:11-13</text:span> / <text:span text:style-name="T15">2Ch 15:16</text:span></text:p>
                  <text:list>
                    <text:list-item>
                      <text:p text:style-name="P12"><text:span text:style-name="T16">Asa and “</text:span><text:span text:style-name="T17">Maachah </text:span><text:span text:style-name="T16">his </text:span><text:span text:style-name="T17">mother” / “</text:span><text:span text:style-name="T18">Maachah the mother of Asa”</text:span></text:p>
                    </text:list-item>
                    <text:list-item>
                      <text:p text:style-name="P13"><text:span text:style-name="T18">Proof that she is his grandmother: </text:span><text:span text:style-name="T13">1Ki 15:1,2,8</text:span><text:span text:style-name="T18">, </text:span><text:span text:style-name="T13">2Ch 11:18-22</text:span><text:span text:style-name="T19">, </text:span><text:span text:style-name="T13">12:16</text:span></text:p>
                    </text:list-item>
                  </text:list>
                </text:list-item>
                <text:list-item>
                  <text:p text:style-name="P14">Luk 13:16</text:p>
                  <text:list>
                    <text:list-item>
                      <text:p text:style-name="P15">“...<text:span text:style-name="T20">daughter of Abraham</text:span>...”</text:p>
                    </text:list-item>
                    <text:list-item>
                      <text:p text:style-name="P15">There’s roughly <text:span text:style-name="T21">1,855</text:span> year<text:span text:style-name="T22">s</text:span> <text:span text:style-name="T23">between</text:span> Abraham and this woman.</text:p>
                    </text:list-item>
                  </text:list>
                </text:list-item>
                <text:list-item>
                  <text:p text:style-name="P16"><text:span text:style-name="T13">1Sa 1:16</text:span> / <text:span text:style-name="T13">1S</text:span><text:span text:style-name="T14">a</text:span><text:span text:style-name="T13"> 25:17</text:span></text:p>
                  <text:list>
                    <text:list-item>
                      <text:p text:style-name="P12"><text:span text:style-name="T24">Hannah, daughter of Belial / </text:span><text:span text:style-name="T25">Nabal, son of Belial</text:span></text:p>
                    </text:list-item>
                    <text:list-item>
                      <text:p text:style-name="P17"><text:span text:style-name="T26">“Belial” </text:span><text:span text:style-name="T27">(17x) </text:span><text:span text:style-name="T26">is </text:span><text:span text:style-name="T27">always </text:span><text:span text:style-name="T28">used </text:span><text:span text:style-name="T26">figurative</text:span><text:span text:style-name="T28">ly</text:span><text:span text:style-name="T26"> </text:span><text:span text:style-name="T28">and </text:span><text:span text:style-name="T27">it’s definition taken from the Bible itself is “</text:span><text:span text:style-name="T28">evil, naughty, ungodly </text:span><text:span text:style-name="T29">men</text:span><text:span text:style-name="T28">, wicked”.</text:span></text:p>
                    </text:list-item>
                  </text:list>
                </text:list-item>
                <text:list-item>
                  <text:p text:style-name="P18"><text:span text:style-name="T13">Mat 9:27</text:span><text:span text:style-name="T30">, </text:span><text:span text:style-name="T13">15:22</text:span><text:span text:style-name="T30">, </text:span><text:span text:style-name="T13">20:30,31</text:span><text:span text:style-name="T30">, </text:span><text:span text:style-name="T13">21:9,15,42</text:span><text:span text:style-name="T30">, </text:span><text:span text:style-name="T13">Mar 10:47,48</text:span><text:span text:style-name="T30">, </text:span><text:span text:style-name="T13">12:35</text:span><text:span text:style-name="T31">, </text:span><text:span text:style-name="T13">Luk 18:38,39</text:span></text:p>
                  <text:list>
                    <text:list-item>
                      <text:p text:style-name="P19">Jesus, <text:span text:style-name="T32">S</text:span>on of David <text:span text:style-name="T33">(</text:span><text:span text:style-name="T34">Mat 1:17</text:span><text:span text:style-name="T33">)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35">Many Bible notes and commentaries assert that </text:span><text:span text:style-name="T36">Ahithophel</text:span><text:span text:style-name="T37"> </text:span><text:span text:style-name="T38">is </text:span><text:span text:style-name="T39">Bathsheba</text:span><text:span text:style-name="T37">’s grandfather </text:span><text:span text:style-name="T40">and if any proof is offered at all they generally</text:span><text:span text:style-name="T41"> assert that it is because</text:span><text:span text:style-name="T35"> </text:span><text:span text:style-name="T42">Eliam</text:span><text:span text:style-name="T35"> and </text:span><text:span text:style-name="T43">Ammiel</text:span><text:span text:style-name="T37"> </text:span><text:span text:style-name="T35">are the same man. </text:span><text:span text:style-name="T38">But, can we prove that with scripture? </text:span><text:span text:style-name="T44">Let’s look at the evidence and draw our own conclusion purely from scripture (</text:span><text:span text:style-name="T45">1Th 5:21</text:span><text:span text:style-name="T44">).</text:span></text:p>
            </text:list-item>
          </text:list>
        </text:list-item>
        <text:list-item>
          <text:p text:style-name="P21"><text:span text:style-name="T13">2Sa 11:3, 23:34</text:span><text:span text:style-name="T46"> are the only mentions of </text:span><text:span text:style-name="T47">any </text:span><text:span text:style-name="T46">“</text:span><text:span text:style-name="T48">Eliam</text:span><text:span text:style-name="T46">” </text:span><text:span text:style-name="T49">(H463)</text:span><text:span text:style-name="T46"> </text:span><text:span text:style-name="T50">and there are no parallel passages or other verses that are clearly about the same man </text:span><text:span text:style-name="T51">and also prove unequivocally </text:span><text:span text:style-name="T50">that he is called by any other name.</text:span></text:p>
        </text:list-item>
        <text:list-item>
          <text:p text:style-name="P15"><text:span text:style-name="T52">If you haven’t already, r</text:span><text:span text:style-name="T53">eview every mention of Ahithophel</text:span><text:span text:style-name="T54">H302</text:span> <text:span text:style-name="T55">(20x)</text:span>, <text:span text:style-name="T56">Bath-sheba</text:span><text:span text:style-name="T57">H1339</text:span> <text:span text:style-name="T55">(11x) </text:span><text:span text:style-name="T56">/Bath-shua</text:span><text:span text:style-name="T57">H1340</text:span> <text:span text:style-name="T55">(2x) to find any more supporting evidence.</text:span></text:p>
        </text:list-item>
        <text:list-item>
          <text:p text:style-name="P22"><text:span text:style-name="T58">The only person left </text:span><text:span text:style-name="T59">to review is </text:span><text:span text:style-name="T60">Ammiel</text:span><text:span text:style-name="T26">.</text:span></text:p>
        </text:list-item>
      </text:list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oft-page-break/><text:span text:style-name="T46"/></text:p>
      <text:p text:style-name="P23"><text:span text:style-name="T46"/></text:p>
      <text:p text:style-name="P24"><text:span text:style-name="T61">Every mention of “Ammiel” </text:span><text:span text:style-name="T62">(H5988)</text:span></text:p>
      <text:p text:style-name="P25">(6 times in 6 verses in 5 chapters in 3 books)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Book</text:p>
          </table:table-cell>
          <table:table-cell table:style-name="Table3.A1" office:value-type="string">
            <text:p text:style-name="P26">Verse</text:p>
          </table:table-cell>
          <table:table-cell table:style-name="Table3.A1" office:value-type="string">
            <text:p text:style-name="P27">Context</text:p>
          </table:table-cell>
          <table:table-cell table:style-name="Table3.D1" office:value-type="string">
            <text:p text:style-name="P26">Same Ammiel <text:span text:style-name="T63">as </text:span><text:span text:style-name="T13">1Ch 3:5</text:span>?</text:p>
          </table:table-cell>
        </table:table-row>
        <table:table-row>
          <table:table-cell table:style-name="Table3.A2" office:value-type="string">
            <text:p text:style-name="P28">Num 13:12</text:p>
          </table:table-cell>
          <table:table-cell table:style-name="Table3.A2" office:value-type="string">
            <text:p text:style-name="P29"><text:span text:style-name="T64">Of the tribe of Da</text:span>n, <text:span text:style-name="T3">Ammiel</text:span><text:span text:style-name="T65">H5988</text:span> th<text:span text:style-name="T64">e son of Gemalli.</text:span></text:p>
          </table:table-cell>
          <table:table-cell table:style-name="Table3.A2" office:value-type="string">
            <text:p text:style-name="P30">Spies sent to search the land of Canaan just before the end of the exodus.</text:p>
          </table:table-cell>
          <table:table-cell table:style-name="Table3.D2" office:value-type="string">
            <text:p text:style-name="P31"><text:span text:style-name="T66">If all parties involved obeyed God’s law, definitely not. </text:span><text:span text:style-name="T67">Ahithophel </text:span><text:span text:style-name="T68">wa</text:span><text:span text:style-name="T67">s from Giloh </text:span><text:span text:style-name="T69">so he</text:span><text:span text:style-name="T67"> is either of </text:span><text:span text:style-name="T70">the tribe of Judah or Levi</text:span><text:span text:style-name="T67"> </text:span><text:span text:style-name="T71">(</text:span><text:span text:style-name="T13">Jos 15:20-51</text:span><text:span text:style-name="T71">, </text:span><text:span text:style-name="T13">2Sa 15:12</text:span>, <text:span text:style-name="T72">Num 36:9</text:span><text:span text:style-name="T71">).</text:span></text:p>
          </table:table-cell>
        </table:table-row>
        <table:table-row>
          <table:table-cell table:style-name="Table3.A2" office:value-type="string">
            <text:p text:style-name="P28">2Sa 9:4</text:p>
          </table:table-cell>
          <table:table-cell table:style-name="Table3.A2" office:value-type="string">
            <text:p text:style-name="P29"><text:span text:style-name="T64">And the king said unto him, Where is he? And Ziba said unto the king, Behold, he </text:span><text:span text:style-name="T73">[Mephibosheth]</text:span><text:span text:style-name="T64"> is in the house of Machir, the so</text:span>n of <text:span text:style-name="T3">Ammiel</text:span><text:span text:style-name="T65">H5988</text:span>, i<text:span text:style-name="T64">n Lodebar.</text:span></text:p>
          </table:table-cell>
          <table:table-cell table:style-name="Table3.A2" table:number-rows-spanned="2" office:value-type="string">
            <text:p text:style-name="P32">Mephibosheth son of Jonathan son of Saul is saught for <text:span text:style-name="T74">by</text:span> David to show him the kindness of God.</text:p>
          </table:table-cell>
          <table:table-cell table:style-name="Table3.D2" table:number-rows-spanned="3" office:value-type="string">
            <text:p text:style-name="P33"><text:span text:style-name="T75">Proabably not</text:span><text:span text:style-name="T76">. </text:span><text:span text:style-name="T77">Every mention of Machir up until this point is referring to Machir the son of Man</text:span><text:span text:style-name="T78">n</text:span><text:span text:style-name="T77">aseh </text:span><text:span text:style-name="T79">the son of Joseph </text:span><text:span text:style-name="T80">the son of Jacob </text:span><text:span text:style-name="T81">the son of Isaac the son of Abraham</text:span><text:span text:style-name="T79">. </text:span><text:span text:style-name="T82">T</text:span><text:span text:style-name="T83">here is no Ammiel listed in the genealogies </text:span><text:span text:style-name="T82">where</text:span><text:span text:style-name="T83"> Mannaseh or Machir </text:span><text:span text:style-name="T82">appear</text:span><text:span text:style-name="T84">.</text:span><text:span text:style-name="T82"> </text:span><text:span text:style-name="T75">The oldest </text:span><text:span text:style-name="T85">chronological </text:span><text:span text:style-name="T75">mention of an Ammiel is of the tribe of Dan (above) which is not an option.</text:span></text:p>
          </table:table-cell>
        </table:table-row>
        <table:table-row>
          <table:table-cell table:style-name="Table3.A2" office:value-type="string">
            <text:p text:style-name="P28">2Sa 9:5</text:p>
          </table:table-cell>
          <table:table-cell table:style-name="Table3.A2" office:value-type="string">
            <text:p text:style-name="P34"><text:span text:style-name="T64">Then king David sent, and fetched him </text:span><text:span text:style-name="T73">[Mephibosheth] </text:span><text:span text:style-name="T64">out of the house of Machir, the son</text:span> of <text:span text:style-name="T3">Ammiel</text:span><text:span text:style-name="T65">H5988</text:span>, fr<text:span text:style-name="T64">om Lodebar.</text:span></text:p>
          </table:table-cell>
          <table:covered-table-cell table:style-name="Table3.A2"/>
          <table:covered-table-cell table:style-name="Table3.D2"/>
        </table:table-row>
        <table:table-row>
          <table:table-cell table:style-name="Table3.A2" office:value-type="string">
            <text:p text:style-name="P28">2Sa 17:27</text:p>
          </table:table-cell>
          <table:table-cell table:style-name="Table3.A2" office:value-type="string">
            <text:p text:style-name="P29"><text:span text:style-name="T64">And it came to pass, when David was come to Mahanaim, that Shobi the son of Nahash of Rabbah of the children of Ammon, and Machir the so</text:span>n of <text:span text:style-name="T3">Ammiel</text:span><text:span text:style-name="T65">H5988</text:span> of <text:span text:style-name="T64">Lodebar, and Barzillai the Gileadite of Rogelim,</text:span></text:p>
          </table:table-cell>
          <table:table-cell table:style-name="Table3.A2" office:value-type="string">
            <text:p text:style-name="P35">After David left Jerusalem during Absalom’s rebellion supplies are brought to him in Mahanaim.</text:p>
          </table:table-cell>
          <table:covered-table-cell table:style-name="Table3.D2"/>
        </table:table-row>
        <table:table-row>
          <table:table-cell table:style-name="Table3.A2" office:value-type="string">
            <text:p text:style-name="P28">1Ch 26:5</text:p>
          </table:table-cell>
          <table:table-cell table:style-name="Table3.A2" office:value-type="string">
            <text:p text:style-name="P29"><text:span text:style-name="T3">Ammiel</text:span><text:span text:style-name="T65">H5988</text:span> the<text:span text:style-name="T64"> sixth, Issachar the seventh, Peulthai the eighth: for God blessed him.</text:span></text:p>
          </table:table-cell>
          <table:table-cell table:style-name="Table3.A2" office:value-type="string">
            <text:p text:style-name="P36"><text:span text:style-name="T86">David distributes the Levites for their specific services. </text:span><text:span text:style-name="T87">cf. </text:span><text:span text:style-name="T13">1Ch 15:18</text:span></text:p>
          </table:table-cell>
          <table:table-cell table:style-name="Table3.D2" office:value-type="string">
            <text:p text:style-name="P37"><text:span text:style-name="T88">Probably not</text:span><text:span text:style-name="T76">. </text:span><text:span text:style-name="T89">This Ammiel is listed as a </text:span><text:span text:style-name="T90">son</text:span><text:span text:style-name="T89"> of Obed-</text:span><text:span text:style-name="T91">e</text:span><text:span text:style-name="T89">dom </text:span><text:span text:style-name="T92">the Gittite </text:span><text:span text:style-name="T93">(the porter; </text:span><text:span text:style-name="T92">of Gath or of Gittaim</text:span><text:span text:style-name="T93">)</text:span><text:span text:style-name="T89">. </text:span></text:p>
            <text:p text:style-name="P37"/>
            <text:p text:style-name="P38"><text:span text:style-name="T94">Even though he’s the closest match to the Ammiel of </text:span><text:span text:style-name="T13">1Ch 3:5</text:span><text:span text:style-name="T94"> h</text:span><text:span text:style-name="T95">e </text:span><text:span text:style-name="T96">is </text:span><text:span text:style-name="T97">most likely </text:span><text:span text:style-name="T96">too young to be the father of Ahithophel and probably too young to be both the son of Ahithophel and the father of Bathsheba.</text:span></text:p>
            <text:p text:style-name="P38"><text:span text:style-name="T96"/></text:p>
            <text:p text:style-name="P39"><text:span text:style-name="T96">R</text:span><text:span text:style-name="T64">egardless, these verses don’t </text:span><text:span text:style-name="T98">add any new </text:span><text:span text:style-name="T64">evidence </text:span><text:span text:style-name="T98">to what we already know.</text:span></text:p>
          </table:table-cell>
        </table:table-row>
      </table:table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23"/>
      <text:p text:style-name="P41"><text:span text:style-name="T99">And so, from scripture only, we are left with the</text:span><text:span text:style-name="T100"> following </text:span><text:span text:style-name="T101">criterion </text:span><text:span text:style-name="T99">for their genealogy:</text:span></text:p>
      <text:p text:style-name="P42"/>
      <text:list xml:id="list3814951864" text:style-name="L2">
        <text:list-item>
          <text:p text:style-name="P43">2Sa 23:34</text:p>
        </text:list-item>
      </text:list>
      <text:list xml:id="list1765695276" text:style-name="L3">
        <text:list-item>
          <text:list>
            <text:list-item>
              <text:p text:style-name="P44">Eliam is a descendant of Ahithophel.</text:p>
              <text:list>
                <text:list-item>
                  <text:p text:style-name="P45">Eliam lived between Ahithophel and Bathsheba.</text:p>
                </text:list-item>
              </text:list>
            </text:list-item>
            <text:list-item>
              <text:p text:style-name="P46">Eliam is not necessarily the direct descendant of Ahithophel.</text:p>
            </text:list-item>
          </text:list>
        </text:list-item>
      </text:list>
      <text:list xml:id="list191314520139617" text:continue-list="list3814951864" text:style-name="L2">
        <text:list-item>
          <text:p text:style-name="P43">2Sa 11:3, 1Ch 3:5</text:p>
        </text:list-item>
      </text:list>
      <text:list xml:id="list191314393466549" text:continue-list="list1765695276" text:style-name="L3">
        <text:list-item>
          <text:list>
            <text:list-item>
              <text:p text:style-name="P47">Bathsheba is a descendant of both Eliam and Ammiel.</text:p>
            </text:list-item>
            <text:list-item>
              <text:p text:style-name="P48"><text:span text:style-name="T102">Eliam </text:span><text:span text:style-name="T103">and Ammiel </text:span><text:span text:style-name="T102">came before </text:span>Bathsheba <text:span text:style-name="T102">but </text:span><text:span text:style-name="T103">are</text:span><text:span text:style-name="T102"> not necessarily her direct ancestor</text:span><text:span text:style-name="T103">s</text:span><text:span text:style-name="T102">.</text:span></text:p>
            </text:list-item>
          </text:list>
        </text:list-item>
      </text:list>
      <text:list text:continue-list="list191314520139617" text:style-name="L2">
        <text:list-item>
          <text:p text:style-name="P43">2Sa 15,16,17</text:p>
        </text:list-item>
      </text:list>
      <text:list text:continue-list="list191314393466549" text:style-name="L3">
        <text:list-item>
          <text:list>
            <text:list-item>
              <text:p text:style-name="P49">Ahithophel is alive at the same time <text:span text:style-name="T104">as</text:span> both David and Bathsheba.</text:p>
              <text:list>
                <text:list-item>
                  <text:p text:style-name="P50">Life expe<text:span text:style-name="T105">ctancy</text:span> of this time period was <text:span text:style-name="T106">very roughly </text:span>around 70 (David) to <text:span text:style-name="T107">a little over </text:span>80 (Barzillai) <text:span text:style-name="T108">which means Ahithophel likely did not live to see his great-grandchildren (but he could have if he lived longer than that).</text:span></text:p>
                </text:list-item>
              </text:list>
            </text:list-item>
          </text:list>
        </text:list-item>
        <text:list-item>
          <text:p text:style-name="P51">We do not know what time period Ammiel lived in <text:span text:style-name="T109">aside from that he came before Bathsheba.</text:span></text:p>
          <text:list>
            <text:list-item>
              <text:p text:style-name="P52">He is not necessarily the direct ancestor of any other person.</text:p>
            </text:list-item>
          </text:list>
        </text:list-item>
      </text:list>
      <text:p text:style-name="P53"/>
      <text:p text:style-name="P54">Because we have no other conditions, multiple possibilities arise <text:span text:style-name="T110">(none of which can be proven with scripture):</text:span></text:p>
      <text:p text:style-name="P5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Ahithophel → Eliam → Ammiel → Bathsheba</text:p>
          </table:table-cell>
          <table:table-cell table:style-name="Table4.B1" office:value-type="string">
            <text:p text:style-name="P56">Ahithophel → Ammiel → Eliam → Bathsheba</text:p>
          </table:table-cell>
        </table:table-row>
        <table:table-row>
          <table:table-cell table:style-name="Table4.A2" office:value-type="string">
            <text:p text:style-name="P57">Ammiel → Ahithophel → Eliam → Bathsheba</text:p>
          </table:table-cell>
          <table:table-cell table:style-name="Table4.B2" office:value-type="string">
            <text:p text:style-name="P58">Ahithophel → Ammiel/Eliam → Bathsheba</text:p>
          </table:table-cell>
        </table:table-row>
      </table:table>
      <text:p text:style-name="P54"/>
      <text:p text:style-name="P59">No matter which possibility we subscribe to we cannot prove any one of the<text:span text:style-name="T111">m</text:span> using <text:span text:style-name="T112">only scripture</text:span><text:span text:style-name="T113">.</text:span></text:p>
      <text:p text:style-name="P59"><text:span text:style-name="T113"/></text:p>
      <text:p text:style-name="Horizontal_20_Line"/>
      <text:p text:style-name="Text_20_body"/>
      <text:p text:style-name="P60"><text:span text:style-name="T114">I</text:span><text:span text:style-name="T115">nteresting side note</text:span><text:span text:style-name="T116">s</text:span><text:span text:style-name="T115">:</text:span></text:p>
      <text:list text:style-name="L4">
        <text:list-item>
          <text:p text:style-name="P61"><text:span text:style-name="T117">Before David, </text:span><text:span text:style-name="T113">Bathsheba was married to Uriah the </text:span><text:span text:style-name="T112">Hittite</text:span></text:p>
          <text:list>
            <text:list-item>
              <text:p text:style-name="P62"><text:span text:style-name="T118">Gen 10:15</text:span><text:span text:style-name="T119">, </text:span><text:span text:style-name="T118">23:10</text:span><text:span text:style-name="T120">, </text:span><text:span text:style-name="T118">49:32</text:span><text:span text:style-name="T121"> together teach us that the Hittites were des</text:span><text:span text:style-name="T122">cendants</text:span><text:span text:style-name="T121"> of Heth the son of Canaan. </text:span><text:span text:style-name="T122">(Noah→ Ham→ </text:span><text:span text:style-name="T116">Canaan→ Heth→ </text:span><text:span text:style-name="T123">Hittites</text:span><text:span text:style-name="T116"> </text:span><text:span text:style-name="T118">Gen 10:1-15</text:span><text:span text:style-name="T116">)</text:span></text:p>
            </text:list-item>
          </text:list>
        </text:list-item>
        <text:list-item>
          <text:p text:style-name="P63"><text:span text:style-name="T113">Eliam is Ammiel </text:span><text:span text:style-name="T124">reversed</text:span><text:span text:style-name="T113"> and vice-versa </text:span><text:span text:style-name="T125">(</text:span><text:span text:style-name="T113">El-i-am ↔ Amm-i-el</text:span><text:span text:style-name="T125">).</text:span></text:p>
        </text:list-item>
      </text:list>
      <text:p text:style-name="P64"><text:span text:style-name="T113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5">El</text:p>
          </table:table-cell>
          <table:table-cell table:style-name="Table5.B1" office:value-type="string">
            <text:p text:style-name="P65">Am(m)</text:p>
          </table:table-cell>
        </table:table-row>
        <table:table-row>
          <table:table-cell table:style-name="Table5.A2" office:value-type="string">
            <text:p text:style-name="P66">God</text:p>
          </table:table-cell>
          <table:table-cell table:style-name="Table5.B2" office:value-type="string">
            <text:p text:style-name="P66">(noun) people or kinsman</text:p>
          </table:table-cell>
        </table:table-row>
        <table:table-row>
          <table:table-cell table:style-name="Table5.B2" table:number-columns-spanned="2" office:value-type="string">
            <text:p text:style-name="P65">God of <text:span text:style-name="T126">(</text:span>the<text:span text:style-name="T126">)</text:span> people, God is kinsman</text:p>
          </table:table-cell>
          <table:covered-table-cell/>
        </table:table-row>
      </table:table>
      <text:p text:style-name="P64"><text:span text:style-name="T113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Am(m)</text:p>
          </table:table-cell>
          <table:table-cell table:style-name="Table6.B1" office:value-type="string">
            <text:p text:style-name="P67">El</text:p>
          </table:table-cell>
        </table:table-row>
        <table:table-row>
          <table:table-cell table:style-name="Table6.A2" office:value-type="string">
            <text:p text:style-name="P66">(noun) people or kinsman</text:p>
          </table:table-cell>
          <table:table-cell table:style-name="Table6.B2" office:value-type="string">
            <text:p text:style-name="P68">God</text:p>
          </table:table-cell>
        </table:table-row>
        <table:table-row>
          <table:table-cell table:style-name="Table6.B2" table:number-columns-spanned="2" office:value-type="string">
            <text:p text:style-name="P67">My kinsman is God; One of the people of God; <text:span text:style-name="T127">people of God</text:span></text:p>
          </table:table-cell>
          <table:covered-table-cell/>
        </table:table-row>
      </table:table>
      <text:p text:style-name="P64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06:08:11.525000000</meta:creation-date>
    <meta:editing-duration>PT9H10M25S</meta:editing-duration>
    <meta:editing-cycles>331</meta:editing-cycles>
    <meta:generator>LibreOffice/25.2.4.3$Linux_X86_64 LibreOffice_project/520$Build-3</meta:generator>
    <dc:title>Ahithophel the Gilonite</dc:title>
    <dc:date>2025-06-30T19:13:14.084032257</dc:date>
    <meta:document-statistic meta:table-count="5" meta:image-count="0" meta:object-count="0" meta:page-count="3" meta:paragraph-count="90" meta:word-count="1120" meta:character-count="6151" meta:non-whitespace-character-count="5157"/>
    <meta:template xlink:type="simple" xlink:actuate="onRequest" xlink:title="BibleStudyTemplate" xlink:href="../../../../AppData/Roaming/LibreOffice/4/user/template/BibleStudyTemplate.ott" meta:date="2025-05-18T06:08:11.232000000"/>
  </office:meta>
</office:document-meta>
</file>