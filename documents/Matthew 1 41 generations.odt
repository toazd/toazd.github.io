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able1" style:family="table">
      <style:table-properties style:width="8.1in" table:align="center"/>
    </style:style>
    <style:style style:name="Table1.A" style:family="table-column">
      <style:table-column-properties style:column-width="2.5507in"/>
    </style:style>
    <style:style style:name="Table1.B" style:family="table-column">
      <style:table-column-properties style:column-width="2.8493in"/>
    </style:style>
    <style:style style:name="Table1.C" style:family="table-column">
      <style:table-column-properties style:column-width="2.7in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 style:master-page-name="">
      <style:paragraph-properties style:page-number="auto" fo:break-before="page"/>
      <style:text-properties officeooo:rsid="00a6871a" officeooo:paragraph-rsid="00a6871a"/>
    </style:style>
    <style:style style:name="P2" style:family="paragraph" style:parent-style-name="Table_20_Contents">
      <style:text-properties fo:color="#127622" loext:opacity="100%" fo:font-size="12pt" officeooo:paragraph-rsid="007121d5" style:font-size-asian="12pt" style:font-size-complex="12pt"/>
    </style:style>
    <style:style style:name="P3" style:family="paragraph" style:parent-style-name="Table_20_Contents">
      <style:text-properties fo:font-size="12pt" officeooo:paragraph-rsid="007121d5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officeooo:paragraph-rsid="00716a94" style:font-size-asian="12pt" style:font-size-complex="12pt"/>
    </style:style>
    <style:style style:name="P5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ff0373" officeooo:paragraph-rsid="00716a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004cc" officeooo:paragraph-rsid="00716a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716a94" fo:background-color="transparent"/>
    </style:style>
    <style:style style:name="P8" style:family="paragraph" style:parent-style-name="Table_20_Contents" style:list-style-name="L2">
      <style:paragraph-properties fo:text-align="left" style:justify-single-word="false"/>
      <style:text-properties officeooo:paragraph-rsid="00716a94" fo:background-color="transparent"/>
    </style:style>
    <style:style style:name="P9" style:family="paragraph" style:parent-style-name="Table_20_Contents" style:list-style-name="L2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004cc" officeooo:paragraph-rsid="00716a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 style:list-style-name="L2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5418c" officeooo:paragraph-rsid="00716a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 style:list-style-name="L2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1aba8" officeooo:paragraph-rsid="00716a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 style:list-style-name="L3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8fe3fd" officeooo:paragraph-rsid="008fe3f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 style:list-style-name="L4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6c9b5" officeooo:paragraph-rsid="00716a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 style:list-style-name="L2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716a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 style:list-style-name="L5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8fe3fd" officeooo:paragraph-rsid="008fe3f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 style:list-style-name="L5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26765" officeooo:paragraph-rsid="00716a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 style:list-style-name="L5">
      <style:paragraph-properties fo:text-align="left" style:justify-single-word="false"/>
      <style:text-properties officeooo:paragraph-rsid="00716a94"/>
    </style:style>
    <style:style style:name="P18" style:family="paragraph" style:parent-style-name="Table_20_Contents" style:list-style-name="L6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9ff905" officeooo:paragraph-rsid="009ff90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 style:list-style-name="L6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94989" officeooo:paragraph-rsid="00b949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 style:list-style-name="L7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1aba8" officeooo:paragraph-rsid="0073a90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 style:list-style-name="L8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a6141c" officeooo:paragraph-rsid="00a6141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 style:list-style-name="L9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b7bf2" officeooo:paragraph-rsid="0073a90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 style:list-style-name="L7">
      <style:paragraph-properties fo:text-align="left" style:justify-single-word="false"/>
      <style:text-properties fo:color="#000000" loext:opacity="10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0165d28" officeooo:paragraph-rsid="0073a90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text-properties style:font-name="Liberation Sans" fo:font-size="12pt" officeooo:rsid="00706212" officeooo:paragraph-rsid="00706212" style:font-size-asian="12pt" style:font-size-complex="12pt"/>
    </style:style>
    <style:style style:name="P25" style:family="paragraph" style:parent-style-name="Standard">
      <style:text-properties style:font-name="Liberation Sans" fo:font-size="12pt" officeooo:rsid="0087012c" officeooo:paragraph-rsid="0087012c" style:font-size-asian="12pt" style:font-size-complex="12pt"/>
    </style:style>
    <style:style style:name="P26" style:family="paragraph" style:parent-style-name="Standard" style:list-style-name="L10">
      <style:text-properties style:font-name="Liberation Sans" fo:font-size="12pt" officeooo:rsid="00adb27c" officeooo:paragraph-rsid="00adb27c" style:font-size-asian="12pt" style:font-size-complex="12pt"/>
    </style:style>
    <style:style style:name="P27" style:family="paragraph" style:parent-style-name="Standard" style:list-style-name="L10">
      <style:text-properties style:font-name="Liberation Sans" fo:font-size="12pt" officeooo:rsid="00a8cbe7" officeooo:paragraph-rsid="00a8cbe7" style:font-size-asian="12pt" style:font-size-complex="12pt"/>
    </style:style>
    <style:style style:name="P28" style:family="paragraph" style:parent-style-name="Standard" style:list-style-name="L10">
      <style:text-properties officeooo:paragraph-rsid="00a8cbe7"/>
    </style:style>
    <style:style style:name="P29" style:family="paragraph" style:parent-style-name="Standard" style:list-style-name="L10">
      <style:text-properties officeooo:paragraph-rsid="00a9be58"/>
    </style:style>
    <style:style style:name="P30" style:family="paragraph" style:parent-style-name="Standard">
      <style:text-properties style:font-name="Liberation Sans" fo:font-size="12pt" officeooo:rsid="00b0e5a0" officeooo:paragraph-rsid="00b0e5a0" style:font-size-asian="12pt" style:font-size-complex="12pt"/>
    </style:style>
    <style:style style:name="P31" style:family="paragraph" style:parent-style-name="Standard" style:list-style-name="L11">
      <style:text-properties style:font-name="Liberation Sans" fo:font-size="12pt" officeooo:rsid="0078cf1c" officeooo:paragraph-rsid="0078cf1c" style:font-size-asian="12pt" style:font-size-complex="12pt"/>
    </style:style>
    <style:style style:name="P32" style:family="paragraph" style:parent-style-name="Standard" style:list-style-name="L11">
      <style:text-properties style:font-name="Liberation Sans" fo:font-size="12pt" officeooo:rsid="009db24a" officeooo:paragraph-rsid="009db24a" style:font-size-asian="12pt" style:font-size-complex="12pt"/>
    </style:style>
    <style:style style:name="P33" style:family="paragraph" style:parent-style-name="Standard" style:list-style-name="L11">
      <style:text-properties style:font-name="Liberation Sans" fo:font-size="12pt" officeooo:rsid="00b3c209" officeooo:paragraph-rsid="00b3c209" style:font-size-asian="12pt" style:font-size-complex="12pt"/>
    </style:style>
    <style:style style:name="P34" style:family="paragraph" style:parent-style-name="Standard" style:list-style-name="L11">
      <style:text-properties style:font-name="Liberation Sans" fo:font-size="12pt" officeooo:rsid="0078cf1c" officeooo:paragraph-rsid="008d2393" style:font-size-asian="12pt" style:font-size-complex="12pt"/>
    </style:style>
    <style:style style:name="T1" style:family="text">
      <style:text-properties officeooo:rsid="00ab0360"/>
    </style:style>
    <style:style style:name="T2" style:family="text">
      <style:text-properties fo:color="#127622" loext:opacity="100%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acea2f"/>
    </style:style>
    <style:style style:name="T5" style:family="text">
      <style:text-properties officeooo:rsid="00bab18e"/>
    </style:style>
    <style:style style:name="T6" style:family="text">
      <style:text-properties officeooo:rsid="00c4737a"/>
    </style:style>
    <style:style style:name="T7" style:family="text">
      <style:text-properties officeooo:rsid="00cc989e"/>
    </style:style>
    <style:style style:name="T8" style:family="text">
      <style:text-properties fo:background-color="#fff5ce" loext:char-shading-value="0"/>
    </style:style>
    <style:style style:name="T9" style:family="text">
      <style:text-properties style:text-underline-style="solid" style:text-underline-width="auto" style:text-underline-color="font-color" fo:background-color="#ffff00" loext:char-shading-value="0"/>
    </style:style>
    <style:style style:name="T10" style:family="text">
      <style:text-properties officeooo:rsid="00ffea0e"/>
    </style:style>
    <style:style style:name="T11" style:family="text">
      <style:text-properties officeooo:rsid="00cb1bef"/>
    </style:style>
    <style:style style:name="T12" style:family="text">
      <style:text-properties officeooo:rsid="0103003c"/>
    </style:style>
    <style:style style:name="T13" style:family="text">
      <style:text-properties officeooo:rsid="01040794"/>
    </style:style>
    <style:style style:name="T14" style:family="text">
      <style:text-properties fo:color="#127622" loext:opacity="100%" officeooo:rsid="00ffea0e"/>
    </style:style>
    <style:style style:name="T15" style:family="text">
      <style:text-properties fo:color="#127622" loext:opacity="100%" officeooo:rsid="00cb1bef"/>
    </style:style>
    <style:style style:name="T16" style:family="text">
      <style:text-properties officeooo:rsid="0017fb3b"/>
    </style:style>
    <style:style style:name="T17" style:family="text">
      <style:text-properties officeooo:rsid="001947ee"/>
    </style:style>
    <style:style style:name="T18" style:family="text">
      <style:text-properties officeooo:rsid="001b024a"/>
    </style:style>
    <style:style style:name="T19" style:family="text">
      <style:text-properties officeooo:rsid="001c6ff9"/>
    </style:style>
    <style:style style:name="T20" style:family="text">
      <style:text-properties officeooo:rsid="001e4958"/>
    </style:style>
    <style:style style:name="T21" style:family="text">
      <style:text-properties officeooo:rsid="010004cc" fo:background-color="#fff5ce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22" style:family="text">
      <style:text-properties style:text-position="0% 100%"/>
    </style:style>
    <style:style style:name="T23" style:family="text">
      <style:text-properties style:text-position="0% 100%" officeooo:rsid="006bc357"/>
    </style:style>
    <style:style style:name="T24" style:family="text">
      <style:text-properties fo:color="#127622" loext:opacity="100%" style:text-position="0% 100%" officeooo:rsid="006bc357"/>
    </style:style>
    <style:style style:name="T25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004cc" fo:background-color="#fff5ce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/>
    </style:style>
    <style:style style:name="T27" style:family="text">
      <style:text-properties fo:color="#000000" loext:opacity="10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06bc357"/>
    </style:style>
    <style:style style:name="T28" style:family="text">
      <style:text-properties fo:color="#127622" loext:opacity="10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06bc357"/>
    </style:style>
    <style:style style:name="T29" style:family="text">
      <style:text-properties officeooo:rsid="0105498d"/>
    </style:style>
    <style:style style:name="T30" style:family="text">
      <style:text-properties fo:color="#127622" loext:opacity="100%" officeooo:rsid="0105498d"/>
    </style:style>
    <style:style style:name="T31" style:family="text">
      <style:text-properties officeooo:rsid="01060d4a"/>
    </style:style>
    <style:style style:name="T32" style:family="text">
      <style:text-properties fo:color="#127622" loext:opacity="100%" officeooo:rsid="01060d4a"/>
    </style:style>
    <style:style style:name="T33" style:family="text">
      <style:text-properties officeooo:rsid="008fe3fd"/>
    </style:style>
    <style:style style:name="T34" style:family="text">
      <style:text-properties officeooo:rsid="0112fc8c"/>
    </style:style>
    <style:style style:name="T35" style:family="text">
      <style:text-properties officeooo:rsid="0101aba8"/>
    </style:style>
    <style:style style:name="T36" style:family="text">
      <style:text-properties style:text-position="0% 100%" officeooo:rsid="01062dd0"/>
    </style:style>
    <style:style style:name="T37" style:family="text">
      <style:text-properties style:text-position="0% 100%" officeooo:rsid="010de2fa"/>
    </style:style>
    <style:style style:name="T38" style:family="text">
      <style:text-properties officeooo:rsid="0115ac8c"/>
    </style:style>
    <style:style style:name="T39" style:family="text">
      <style:text-properties officeooo:rsid="0106f4a5"/>
    </style:style>
    <style:style style:name="T40" style:family="text">
      <style:text-properties officeooo:rsid="009ee1b3"/>
    </style:style>
    <style:style style:name="T41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1aba8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846d0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9ff905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de2fa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5" style:family="text">
      <style:text-properties officeooo:rsid="010846d0"/>
    </style:style>
    <style:style style:name="T46" style:family="text">
      <style:text-properties officeooo:rsid="00a6141c"/>
    </style:style>
    <style:style style:name="T47" style:family="text">
      <style:text-properties officeooo:rsid="010de2fa"/>
    </style:style>
    <style:style style:name="T48" style:family="text">
      <style:text-properties officeooo:rsid="010c0d57"/>
    </style:style>
    <style:style style:name="T49" style:family="text">
      <style:text-properties officeooo:rsid="010f2921"/>
    </style:style>
    <style:style style:name="T50" style:family="text">
      <style:text-properties fo:color="#127622" loext:opacity="100%" officeooo:rsid="00571c68"/>
    </style:style>
    <style:style style:name="T51" style:family="text">
      <style:text-properties officeooo:rsid="0050487d"/>
    </style:style>
    <style:style style:name="T52" style:family="text">
      <style:text-properties fo:color="#127622" loext:opacity="100%" officeooo:rsid="0050487d"/>
    </style:style>
    <style:style style:name="T53" style:family="text">
      <style:text-properties officeooo:rsid="0050b959"/>
    </style:style>
    <style:style style:name="T54" style:family="text">
      <style:text-properties officeooo:rsid="0051d991"/>
    </style:style>
    <style:style style:name="T55" style:family="text">
      <style:text-properties officeooo:rsid="0053ad76"/>
    </style:style>
    <style:style style:name="T56" style:family="text">
      <style:text-properties fo:color="#127622" loext:opacity="100%" officeooo:rsid="0053ad76"/>
    </style:style>
    <style:style style:name="T57" style:family="text">
      <style:text-properties officeooo:rsid="0116a6fd"/>
    </style:style>
    <style:style style:name="T58" style:family="text">
      <style:text-properties officeooo:rsid="00a8cbe7"/>
    </style:style>
    <style:style style:name="T59" style:family="text">
      <style:text-properties officeooo:rsid="00b0e5a0"/>
    </style:style>
    <style:style style:name="T60" style:family="text">
      <style:text-properties officeooo:rsid="00af22c1"/>
    </style:style>
    <style:style style:name="T61" style:family="text">
      <style:text-properties style:font-name="Liberation Sans" fo:font-size="12pt" officeooo:rsid="00c7826e" style:font-size-asian="12pt" style:font-size-complex="12pt"/>
    </style:style>
    <style:style style:name="T62" style:family="text">
      <style:text-properties style:font-name="Liberation Sans" fo:font-size="12pt" officeooo:rsid="00a8cbe7" style:font-size-asian="12pt" style:font-size-complex="12pt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c7826e" style:font-weight-asian="normal" style:font-weight-complex="normal"/>
    </style:style>
    <style:style style:name="T65" style:family="text">
      <style:text-properties fo:font-weight="normal" officeooo:rsid="00a8cbe7" style:font-weight-asian="normal" style:font-weight-complex="normal"/>
    </style:style>
    <style:style style:name="T66" style:family="text">
      <style:text-properties officeooo:rsid="00b5b79f"/>
    </style:style>
    <style:style style:name="T67" style:family="text">
      <style:text-properties officeooo:rsid="00b68a61"/>
    </style:style>
    <style:style style:name="T68" style:family="text">
      <style:text-properties officeooo:rsid="00be29f4"/>
    </style:style>
    <style:style style:name="T69" style:family="text">
      <style:text-properties officeooo:rsid="00cd617b"/>
    </style:style>
    <style:style style:name="T70" style:family="text">
      <style:text-properties style:text-position="super 58%" officeooo:rsid="00be29f4"/>
    </style:style>
    <style:style style:name="T71" style:family="text">
      <style:text-properties officeooo:rsid="00bf25f1"/>
    </style:style>
    <style:style style:name="T72" style:family="text">
      <style:text-properties officeooo:rsid="009a113f"/>
    </style:style>
    <style:style style:name="T73" style:family="text">
      <style:text-properties officeooo:rsid="008d2393"/>
    </style:style>
    <style:style style:name="T74" style:family="text">
      <style:text-properties officeooo:rsid="009c04a4"/>
    </style:style>
    <style:style style:name="T75" style:family="text">
      <style:text-properties officeooo:rsid="00b257ae"/>
    </style:style>
    <style:style style:name="T76" style:family="text">
      <style:text-properties fo:color="#127622" loext:opacity="100%" officeooo:rsid="008d2393"/>
    </style:style>
    <style:style style:name="T77" style:family="text">
      <style:text-properties fo:color="#127622" loext:opacity="100%" officeooo:rsid="009c04a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do we get 42 generations <text:span text:style-name="T1">(14+14+14) </text:span>when only 41 are listed in <text:span text:style-name="T2">Matthew 1</text:span>? We look at <text:span text:style-name="T3">all</text:span> of the words that God <text:span text:style-name="T4">wrote</text:span>. <text:span text:style-name="T5">When we do, the answer is in plain English: </text:span><text:span text:style-name="T6">David is counted twice </text:span><text:span text:style-name="T7">(once in the first, and once in the second set of 14) </text:span><text:span text:style-name="T6">and the generation of the Babylonian captivity is not counted in the second set of 14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2">Matthew 1:17</text:p>
            <text:p text:style-name="P3">So all the generations <text:span text:style-name="T8">from Abraham to David</text:span> are fourteen generations; and <text:span text:style-name="T8">from David until the carrying away into Babylon</text:span> are fourteen generations; and <text:span text:style-name="T8">from the carrying away into Babylon unto Christ</text:span> are fourteen generation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4">from Abraham <text:span text:style-name="T9">to</text:span> David</text:p>
          </table:table-cell>
          <table:table-cell table:style-name="Table1.A2" office:value-type="string">
            <text:p text:style-name="P4">from David <text:span text:style-name="T9">until</text:span> the carrying away into Babylon</text:p>
          </table:table-cell>
          <table:table-cell table:style-name="Table1.C2" office:value-type="string">
            <text:p text:style-name="P4">from the carrying away into Babylon <text:span text:style-name="T9">unto</text:span> Christ</text:p>
          </table:table-cell>
        </table:table-row>
        <table:table-row>
          <table:table-cell table:style-name="Table1.A3" office:value-type="string">
            <text:list text:style-name="L1">
              <text:list-item>
                <text:p text:style-name="P5">Abraham</text:p>
              </text:list-item>
              <text:list-item>
                <text:p text:style-name="P5">Isaac</text:p>
              </text:list-item>
              <text:list-item>
                <text:p text:style-name="P5">Jacob</text:p>
              </text:list-item>
              <text:list-item>
                <text:p text:style-name="P5">Judas (Judah) <text:span text:style-name="T2">Gen 46:12</text:span></text:p>
              </text:list-item>
              <text:list-item>
                <text:p text:style-name="P5">Phares <text:span text:style-name="T10">(Pharez/</text:span><text:span text:style-name="T11">Perez</text:span><text:span text:style-name="T10">) </text:span><text:span text:style-name="T12">&amp; Zara </text:span><text:span text:style-name="T13">(Zerah)</text:span><text:span text:style-name="T12"> </text:span><text:span text:style-name="T14">Gen 46:12, </text:span><text:span text:style-name="T15">1Ch 27:3, Neh 11:4,6</text:span></text:p>
              </text:list-item>
              <text:list-item>
                <text:p text:style-name="P6"><text:span text:style-name="T16">Hezron/</text:span>Esrom</text:p>
              </text:list-item>
              <text:list-item>
                <text:p text:style-name="P6"><text:span text:style-name="T17">Ram/</text:span>Aram</text:p>
              </text:list-item>
              <text:list-item>
                <text:p text:style-name="P6"><text:span text:style-name="T18">Amminadab/</text:span>Aminadab</text:p>
              </text:list-item>
              <text:list-item>
                <text:p text:style-name="P6"><text:span text:style-name="T19">Nahshon/</text:span>Naasson</text:p>
              </text:list-item>
              <text:list-item>
                <text:p text:style-name="P6">Salmon</text:p>
              </text:list-item>
              <text:list-item>
                <text:p text:style-name="P6"><text:span text:style-name="T20">Boaz/</text:span>Booz</text:p>
              </text:list-item>
              <text:list-item>
                <text:p text:style-name="P6">Obed</text:p>
              </text:list-item>
              <text:list-item>
                <text:p text:style-name="P6">Jesse</text:p>
              </text:list-item>
              <text:list-item>
                <text:p text:style-name="P7"><text:span text:style-name="T21">David</text:span><text:span text:style-name="T22"> </text:span><text:span text:style-name="T23">(</text:span><text:span text:style-name="T24">1Ch 3</text:span><text:span text:style-name="T23">)</text:span></text:p>
              </text:list-item>
            </text:list>
          </table:table-cell>
          <table:table-cell table:style-name="Table1.B3" office:value-type="string">
            <text:list xml:id="list2831924475" text:style-name="L2">
              <text:list-item>
                <text:p text:style-name="P8"><text:span text:style-name="T25">David</text:span><text:span text:style-name="T26"> </text:span><text:span text:style-name="T27">(</text:span><text:span text:style-name="T28">1Ch 3</text:span><text:span text:style-name="T27">)</text:span></text:p>
              </text:list-item>
              <text:list-item>
                <text:p text:style-name="P9">Solomon</text:p>
              </text:list-item>
              <text:list-item>
                <text:p text:style-name="P10">Roboam</text:p>
              </text:list-item>
              <text:list-item>
                <text:p text:style-name="P9">Abia</text:p>
              </text:list-item>
              <text:list-item>
                <text:p text:style-name="P9">Asa</text:p>
              </text:list-item>
              <text:list-item>
                <text:p text:style-name="P11">Josaphat <text:span text:style-name="T29">(Jehoshaphat </text:span><text:span text:style-name="T30">1Ki 15:24</text:span><text:span text:style-name="T31">)</text:span></text:p>
              </text:list-item>
              <text:list-item>
                <text:p text:style-name="P11">Joram <text:span text:style-name="T31">(Jehoram </text:span><text:span text:style-name="T32">2Ki 8:16</text:span><text:span text:style-name="T31">)</text:span></text:p>
              </text:list-item>
            </text:list>
            <text:list text:style-name="L3">
              <text:list-item>
                <text:p text:style-name="P12">Elder Ahaziah</text:p>
              </text:list-item>
            </text:list>
            <text:list text:style-name="L4">
              <text:list-item>
                <text:p text:style-name="P13"><text:span text:style-name="T33">Younger </text:span>Ahaziah <text:span text:style-name="T34">(Azariah/Jehoahaz)</text:span></text:p>
              </text:list-item>
              <text:list-item>
                <text:p text:style-name="P13">Joash <text:span text:style-name="T34">(Jehoash)</text:span></text:p>
              </text:list-item>
              <text:list-item>
                <text:p text:style-name="P13">Amaziah</text:p>
              </text:list-item>
            </text:list>
            <text:list text:continue-list="list2831924475" text:style-name="L2">
              <text:list-item>
                <text:p text:style-name="P14"><text:span text:style-name="T35">Ozias </text:span><text:span text:style-name="T36">(Azariah/Uzziah</text:span><text:span text:style-name="T37">)</text:span></text:p>
              </text:list-item>
              <text:list-item>
                <text:p text:style-name="P11">Joatham <text:span text:style-name="T38">(Jotham)</text:span></text:p>
              </text:list-item>
              <text:list-item>
                <text:p text:style-name="P11">Achaz</text:p>
              </text:list-item>
              <text:list-item>
                <text:p text:style-name="P11">Ezekias <text:span text:style-name="T39">(Hezekiah)</text:span></text:p>
              </text:list-item>
              <text:list-item>
                <text:p text:style-name="P11">Manasses <text:span text:style-name="T39">(Manasseh)</text:span></text:p>
              </text:list-item>
              <text:list-item>
                <text:p text:style-name="P11">Amon</text:p>
              </text:list-item>
              <text:list-item>
                <text:p text:style-name="P11">Josias <text:span text:style-name="T39">(Josiah)</text:span></text:p>
              </text:list-item>
            </text:list>
            <text:list text:style-name="L5">
              <text:list-item>
                <text:p text:style-name="P15">Jehoahaz/<text:span text:style-name="T40">Shallum</text:span></text:p>
              </text:list-item>
              <text:list-item>
                <text:p text:style-name="P16">Eliakim/Jehoiakim</text:p>
              </text:list-item>
              <text:list-item>
                <text:p text:style-name="P17"><text:span text:style-name="T41">Jechonias </text:span><text:span text:style-name="T42">(</text:span><text:span text:style-name="T43">Elder </text:span><text:span text:style-name="T44">Jehoi</text:span><text:span text:style-name="T43">a</text:span><text:span text:style-name="T44">chin/</text:span><text:span text:style-name="T42">Jeconiah/</text:span><text:span text:style-name="T43">Coniah</text:span><text:span text:style-name="T42">)</text:span></text:p>
              </text:list-item>
            </text:list>
            <text:list text:style-name="L6">
              <text:list-item>
                <text:p text:style-name="P18">Younger Jehoiachin</text:p>
              </text:list-item>
            </text:list>
          </table:table-cell>
          <table:table-cell table:style-name="Table1.C3" office:value-type="string">
            <text:list text:continue-numbering="true" text:style-name="L6">
              <text:list-item>
                <text:p text:style-name="P19">Eliakim/Jehoiakim</text:p>
              </text:list-item>
            </text:list>
            <text:list xml:id="list3336781095" text:style-name="L7">
              <text:list-item>
                <text:p text:style-name="P20">Jechonias <text:span text:style-name="T45">(</text:span><text:span text:style-name="T46">Elder </text:span><text:span text:style-name="T47">Jehoichin/</text:span><text:span text:style-name="T45">Jeconiah)</text:span></text:p>
              </text:list-item>
            </text:list>
            <text:list text:style-name="L8">
              <text:list-item>
                <text:p text:style-name="P21">Younger Jehoiachin</text:p>
              </text:list-item>
            </text:list>
            <text:list xml:id="list121954238914420" text:continue-list="list3336781095" text:style-name="L7">
              <text:list-item>
                <text:p text:style-name="P20">Salathiel <text:span text:style-name="T48">(Shealtiel)</text:span></text:p>
              </text:list-item>
            </text:list>
            <text:list text:style-name="L9">
              <text:list-item>
                <text:p text:style-name="P22">Pedaiah (Salathiel’s brother) (<text:span text:style-name="T2">1Ch 3:17-19</text:span>)</text:p>
              </text:list-item>
            </text:list>
            <text:list text:continue-list="list121954238914420" text:style-name="L7">
              <text:list-item>
                <text:p text:style-name="P20">Zorobabel <text:span text:style-name="T49">(Zerubbabel </text:span><text:span text:style-name="T50">Ezr 3:2</text:span><text:span text:style-name="T49">)</text:span></text:p>
              </text:list-item>
              <text:list-item>
                <text:p text:style-name="P20">Abiud</text:p>
              </text:list-item>
              <text:list-item>
                <text:p text:style-name="P20">Eliakim</text:p>
              </text:list-item>
              <text:list-item>
                <text:p text:style-name="P20">Azor <text:span text:style-name="T51">(Azzur? </text:span><text:span text:style-name="T52">Neh 9:38-10:17</text:span><text:span text:style-name="T51">, </text:span><text:span text:style-name="T53">G107→H5809</text:span><text:span text:style-name="T51">)</text:span></text:p>
              </text:list-item>
              <text:list-item>
                <text:p text:style-name="P20">Sadoc <text:span text:style-name="T54">(Zadok? </text:span><text:span text:style-name="T52">Neh 9:38-10:17</text:span><text:span text:style-name="T51">, </text:span><text:span text:style-name="T53">G</text:span><text:span text:style-name="T54">4524</text:span><text:span text:style-name="T53">→H</text:span><text:span text:style-name="T54">6659</text:span><text:span text:style-name="T51">)</text:span></text:p>
              </text:list-item>
              <text:list-item>
                <text:p text:style-name="P20">Achim <text:span text:style-name="T55">(Jokim? </text:span><text:span text:style-name="T56">1Ch 4:21-22</text:span><text:span text:style-name="T55">, G885→H3137)</text:span></text:p>
              </text:list-item>
              <text:list-item>
                <text:p text:style-name="P20">Eliud</text:p>
              </text:list-item>
              <text:list-item>
                <text:p text:style-name="P20">Eleazar</text:p>
              </text:list-item>
              <text:list-item>
                <text:p text:style-name="P20">Matthan</text:p>
              </text:list-item>
              <text:list-item>
                <text:p text:style-name="P20">Jacob</text:p>
              </text:list-item>
              <text:list-item>
                <text:p text:style-name="P20">Joseph</text:p>
              </text:list-item>
              <text:list-item>
                <text:p text:style-name="P23"><text:span text:style-name="T57">J</text:span>esus</text:p>
              </text:list-item>
            </text:list>
          </table:table-cell>
        </table:table-row>
      </table:table>
      <text:p text:style-name="P24"/>
      <text:p text:style-name="P25"><text:span text:style-name="T58">N</text:span>otes:</text:p>
      <text:list text:style-name="L10">
        <text:list-item>
          <text:p text:style-name="P26">Think of “to” <text:span text:style-name="T59">and “unto” </text:span>as “up to and including”.</text:p>
        </text:list-item>
        <text:list-item>
          <text:p text:style-name="P26">Think of “until” as “<text:span text:style-name="T60">up until</text:span>” <text:span text:style-name="T60">or “just before”.</text:span></text:p>
        </text:list-item>
        <text:list-item>
          <text:p text:style-name="P27">The Babylonian captivity began the same year that Eliakim/Jehoiakim and his two sons named Jehoiachin were carried off to Babylon (<text:span text:style-name="T2">2Ch 36:9,10</text:span>, <text:span text:style-name="T2">Jer 29:1,2,10</text:span>).</text:p>
          <text:list>
            <text:list-item>
              <text:p text:style-name="P28"><text:span text:style-name="T61">R</text:span><text:span text:style-name="T62">efer to the the article entitled “</text:span><text:a xlink:type="simple" xlink:href="https://cheerful-wmcdannell.wordpress.com/2025/08/05/kings-of-judah-israel-timeline-biblical-data-only-wip/" text:style-name="Internet_20_link" text:visited-style-name="Visited_20_Internet_20_Link"><text:span text:style-name="Strong_20_Emphasis">Kings of Judah &amp; Israel timeline</text:span></text:a><text:span text:style-name="Strong_20_Emphasis">”</text:span><text:span text:style-name="Strong_20_Emphasis"><text:span text:style-name="T63"> </text:span></text:span><text:span text:style-name="Strong_20_Emphasis"><text:span text:style-name="T64">for a chart of timing data.</text:span></text:span></text:p>
            </text:list-item>
            <text:list-item>
              <text:p text:style-name="P29"><text:span text:style-name="Strong_20_Emphasis"><text:span text:style-name="T64">R</text:span></text:span><text:span text:style-name="Strong_20_Emphasis"><text:span text:style-name="T65">efer to the article entitled “</text:span></text:span><text:a xlink:type="simple" xlink:href="https://cheerful-wmcdannell.wordpress.com/2025/08/01/amazing-facts-about-the-kings-of-israel-judah-that-you-probably-didnt-notice/" text:style-name="Internet_20_link" text:visited-style-name="Visited_20_Internet_20_Link"><text:span text:style-name="Strong_20_Emphasis"><text:span text:style-name="T58">Amazing facts about the kings of Israel &amp; Judah that you probably didn’t notice</text:span></text:span></text:a><text:span text:style-name="Strong_20_Emphasis"><text:span text:style-name="T65">” </text:span></text:span><text:span text:style-name="Strong_20_Emphasis"><text:span text:style-name="T64">to learn more about Eliakim’s two sons named Jehoiachin.</text:span></text:span></text:p>
            </text:list-item>
          </text:list>
        </text:list-item>
      </text:list>
      <text:p text:style-name="P30"/>
      <text:p text:style-name="P30">Misc notes:</text:p>
      <text:list text:style-name="L11">
        <text:list-item>
          <text:p text:style-name="P31">Josias did not make it into Babylon.</text:p>
        </text:list-item>
        <text:list-item>
          <text:p text:style-name="P32">Jehoahaz/Shallum was taken and would not return (<text:span text:style-name="T2">Jer 22:11</text:span>).</text:p>
          <text:list>
            <text:list-item>
              <text:p text:style-name="P33">He is not listed in <text:span text:style-name="T2">Matthew 1</text:span> and the Babylonian captivity <text:span text:style-name="T66">d</text:span><text:span text:style-name="T67">id</text:span> not begin until <text:span text:style-name="T68">the 1</text:span><text:span text:style-name="T69">1</text:span><text:span text:style-name="T70">th</text:span><text:span text:style-name="T68"> year </text:span>after his reign ended <text:span text:style-name="T71">(assuming his reign began and ended in the same year; his reign lasted 3 months).</text:span></text:p>
            </text:list-item>
          </text:list>
        </text:list-item>
        <text:list-item>
          <text:p text:style-name="P34">Eliakim/<text:span text:style-name="T72">Jehoiakim</text:span> <text:span text:style-name="T73">was carried to Babylon </text:span><text:span text:style-name="T74">before dying</text:span><text:span text:style-name="T73"> </text:span><text:span text:style-name="T74">and </text:span><text:span text:style-name="T73">after reigning for 11 y</text:span><text:span text:style-name="T75">ea</text:span><text:span text:style-name="T73">rs in Jerusalem (</text:span><text:span text:style-name="T76">2Ch 36:4-6</text:span><text:span text:style-name="T73">, </text:span><text:span text:style-name="T77">2Ki 24:6</text:span><text:span text:style-name="T74">)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8-02T16:08:01.413000000</meta:creation-date>
    <dc:date>2026-07-11T12:19:53.384993773</dc:date>
    <meta:editing-duration>PT12H7M11S</meta:editing-duration>
    <meta:editing-cycles>178</meta:editing-cycles>
    <meta:generator>LibreOffice/26.2.4.2$Linux_X86_64 LibreOffice_project/64a984c51f4702dbd3710b13428c673a2f1292e7</meta:generator>
    <dc:title>Matthew 1 41 generations</dc:title>
    <meta:print-date>2025-06-30T17:25:07.136148445</meta:print-date>
    <meta:printed-by>PDF files</meta:printed-by>
    <meta:document-statistic meta:table-count="1" meta:image-count="0" meta:object-count="0" meta:page-count="1" meta:paragraph-count="70" meta:word-count="460" meta:character-count="2635" meta:non-whitespace-character-count="2307"/>
  </office:meta>
</office:document-meta>
</file>