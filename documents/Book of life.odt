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bc84a"/>
    </style:style>
    <style:style style:name="P2" style:family="paragraph" style:parent-style-name="Standard" style:list-style-name="L1">
      <style:text-properties officeooo:rsid="001c1f76" officeooo:paragraph-rsid="001c1f76"/>
    </style:style>
    <style:style style:name="P3" style:family="paragraph" style:parent-style-name="Standard" style:list-style-name="L1">
      <style:text-properties officeooo:rsid="001d378f" officeooo:paragraph-rsid="001d378f"/>
    </style:style>
    <style:style style:name="P4" style:family="paragraph" style:parent-style-name="Standard">
      <style:text-properties officeooo:rsid="001c1f76" officeooo:paragraph-rsid="001c1f76"/>
    </style:style>
    <style:style style:name="P5" style:family="paragraph" style:parent-style-name="Table_20_Contents">
      <style:text-properties fo:color="#127622" loext:opacity="100%" officeooo:paragraph-rsid="001de8b2"/>
    </style:style>
    <style:style style:name="P6" style:family="paragraph" style:parent-style-name="Table_20_Contents">
      <style:text-properties officeooo:paragraph-rsid="001de8b2"/>
    </style:style>
    <style:style style:name="P7" style:family="paragraph" style:parent-style-name="Table_20_Contents">
      <style:text-properties fo:color="#127622" loext:opacity="100%" officeooo:paragraph-rsid="00211035"/>
    </style:style>
    <style:style style:name="P8" style:family="paragraph" style:parent-style-name="Table_20_Contents">
      <style:text-properties officeooo:paragraph-rsid="00211035"/>
    </style:style>
    <style:style style:name="P9" style:family="paragraph" style:parent-style-name="Table_20_Contents">
      <style:text-properties officeooo:paragraph-rsid="00216a83"/>
    </style:style>
    <style:style style:name="P10" style:family="paragraph" style:parent-style-name="Table_20_Contents">
      <style:text-properties fo:color="#127622" loext:opacity="100%" officeooo:paragraph-rsid="00216a83"/>
    </style:style>
    <style:style style:name="P11" style:family="paragraph" style:parent-style-name="Table_20_Contents">
      <style:text-properties fo:color="#127622" loext:opacity="100%" officeooo:paragraph-rsid="002951b6"/>
    </style:style>
    <style:style style:name="P12" style:family="paragraph" style:parent-style-name="Table_20_Contents">
      <style:text-properties officeooo:paragraph-rsid="002951b6"/>
    </style:style>
    <style:style style:name="P13" style:family="paragraph" style:parent-style-name="Standard" style:list-style-name="L2">
      <style:text-properties officeooo:rsid="002951b6" officeooo:paragraph-rsid="002951b6"/>
    </style:style>
    <style:style style:name="P14" style:family="paragraph" style:parent-style-name="Standard" style:list-style-name="L2">
      <style:text-properties officeooo:rsid="0027843e" officeooo:paragraph-rsid="0027843e"/>
    </style:style>
    <style:style style:name="P15" style:family="paragraph" style:parent-style-name="Standard" style:list-style-name="L2">
      <style:text-properties officeooo:rsid="0024d8c0" officeooo:paragraph-rsid="002ad419"/>
    </style:style>
    <style:style style:name="P16" style:family="paragraph" style:parent-style-name="Standard">
      <style:text-properties officeooo:rsid="0024d8c0" officeooo:paragraph-rsid="0027843e"/>
    </style:style>
    <style:style style:name="P17" style:family="paragraph" style:parent-style-name="Table_20_Contents">
      <style:text-properties fo:color="#127622" loext:opacity="100%" officeooo:paragraph-rsid="002cd1e8"/>
    </style:style>
    <style:style style:name="P18" style:family="paragraph" style:parent-style-name="Table_20_Contents">
      <style:text-properties officeooo:paragraph-rsid="002cd1e8"/>
    </style:style>
    <style:style style:name="P19" style:family="paragraph" style:parent-style-name="Table_20_Contents">
      <style:text-properties fo:color="#127622" loext:opacity="100%" officeooo:paragraph-rsid="002d6426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729fcf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tyle="italic"/>
    </style:style>
    <style:style style:name="T6" style:family="text">
      <style:text-properties officeooo:rsid="001de8b2"/>
    </style:style>
    <style:style style:name="T7" style:family="text">
      <style:text-properties fo:background-color="#ffff00" loext:char-shading-value="0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ad419"/>
    </style:style>
    <style:style style:name="T11" style:family="text">
      <style:text-properties fo:font-style="italic" officeooo:rsid="002ad419" style:font-style-asian="italic" style:font-style-complex="italic"/>
    </style:style>
    <style:style style:name="T12" style:family="text">
      <style:text-properties officeooo:rsid="00241f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32:30-35</text:span><text:line-break/><text:span text:style-name="T2">30</text:span> And it came to pass on the morrow, that Moses said unto the people, Ye have sinned a great sin: and now I will go up unto the LORD; peradventure I shall make an atonement for your sin.<text:line-break/><text:span text:style-name="T2">31</text:span> And Moses returned unto the LORD, and said, <text:span text:style-name="T3">Oh, this people have sinned a great sin, and have made them gods of gold.</text:span><text:line-break/><text:span text:style-name="T2">32</text:span> <text:span text:style-name="T3">Yet now, if thou wilt forgive their sin—; and if not, blot me, I pray thee, out of thy book which thou hast written.</text:span><text:line-break/><text:span text:style-name="T2">33</text:span> And the LORD said unto Moses, <text:span text:style-name="T4">Whosoever hath sinned against me, him will I blot out of my book.</text:span><text:line-break/><text:span text:style-name="T2">34</text:span> Therefore now go, lead the people unto <text:span text:style-name="T5">the place</text:span> of which I have spoken unto thee: behold, mine Angel shall go before thee: nevertheless in the day when I visit I will visit their sin upon them.<text:line-break/><text:span text:style-name="T2">35</text:span> And the LORD plagued the people, because they made the calf, which Aaron made.</text:p>
          </table:table-cell>
        </table:table-row>
      </table:table>
      <text:p text:style-name="Standard"/>
      <text:list text:style-name="L1">
        <text:list-item>
          <text:p text:style-name="P2">v32 “thou has written” – past tense</text:p>
        </text:list-item>
        <text:list-item>
          <text:p text:style-name="P2">v33 “whosoever” – anyone and everyone</text:p>
          <text:list>
            <text:list-item>
              <text:p text:style-name="P2"><text:span text:style-name="T6">Any s</text:span>in gets anyone blotted out of the book of [life]</text:p>
            </text:list-item>
          </text:list>
        </text:list-item>
        <text:list-item>
          <text:p text:style-name="P3">In order to get blotted out of the book of life, first you would have to be in it</text:p>
        </text:list-item>
      </text:list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1 Kings 8:46</text:p>
            <text:p text:style-name="P6">If they sin against thee, (for <text:span text:style-name="T7">there is no man that sinneth not</text:span>,) and thou be angry with them, and deliver them to the enemy, so that they carry them away captives unto the land of the enemy, far or near;</text:p>
          </table:table-cell>
        </table:table-row>
        <table:table-row>
          <table:table-cell table:style-name="Table4.A2" office:value-type="string">
            <text:p text:style-name="P7">Romans 3:23</text:p>
            <text:p text:style-name="P8">For <text:span text:style-name="T7">all have sinned</text:span>, and come short of the glory of God;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<text:span text:style-name="T1">Ephesians 2:8-10<text:line-break/></text:span>8 For by grace are ye saved through faith; and that <text:span text:style-name="T7">not of yourselves</text:span>: it is the gift of God: <text:line-break/>9 Not of works, lest any man should boast. <text:line-break/>10 For <text:span text:style-name="T7">we are his workmanship</text:span>, created in Christ Jesus unto good works, which God hath before ordained that we should walk in them.</text:p>
          </table:table-cell>
        </table:table-row>
        <table:table-row>
          <table:table-cell table:style-name="Table6.A2" office:value-type="string">
            <text:p text:style-name="P10">1 John 2:2</text:p>
            <text:p text:style-name="P9">And <text:span text:style-name="T7">he is the propitiation for our sins</text:span>: and not for ours only, but also for the sins of the whole world.</text:p>
          </table:table-cell>
        </table:table-row>
        <table:table-row>
          <table:table-cell table:style-name="Table6.A2" office:value-type="string">
            <text:p text:style-name="P11">Galatians 2:20</text:p>
            <text:p text:style-name="P12">I am crucified with Christ: nevertheless I live; yet not I, but <text:span text:style-name="T7">Christ liveth in me</text:span>: and the life which I now live in the flesh <text:span text:style-name="T7">I live by the faith </text:span><text:span text:style-name="T8">of</text:span><text:span text:style-name="T7"> the Son of God</text:span>, who loved me, and gave himself for me.</text:p>
          </table:table-cell>
        </table:table-row>
      </table:table>
      <text:list text:style-name="L2">
        <text:list-item>
          <text:p text:style-name="P13">God saves us through Jesus and it is entirely His work</text:p>
        </text:list-item>
        <text:list-item>
          <text:p text:style-name="P14">Jesus gets us back into the book of life</text:p>
        </text:list-item>
        <text:list-item>
          <text:p text:style-name="P15">Not “faith <text:span text:style-name="T9">in</text:span> the Son of God” but “faith <text:span text:style-name="T9">of</text:span> the Son of God” <text:span text:style-name="T10">(the faith that </text:span><text:span text:style-name="T11">comes from</text:span><text:span text:style-name="T10"> Jesus)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1 Corinthians 12:3</text:p>
            <text:p text:style-name="P18">Wherefore I give you to understand, that no man speaking by the Spirit of God calleth Jesus accursed: and <text:span text:style-name="T12">t</text:span>hat <text:span text:style-name="T7">no man can say that Jesus is the Lord, but by the Holy Ghost</text:span>.</text:p>
          </table:table-cell>
        </table:table-row>
        <table:table-row>
          <table:table-cell table:style-name="Table2.A2" office:value-type="string">
            <text:p text:style-name="P19">1 John 4:15</text:p>
            <text:p text:style-name="Table_20_Contents">Whosoever shall confess that Jesus is the Son of God, God dwelleth in him, and he in God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21:35:08.130110600</meta:creation-date>
    <meta:editing-duration>PT31M59S</meta:editing-duration>
    <meta:editing-cycles>26</meta:editing-cycles>
    <meta:generator>LibreOffice/26.2.4.2$Linux_X86_64 LibreOffice_project/64a984c51f4702dbd3710b13428c673a2f1292e7</meta:generator>
    <dc:title>Book of life</dc:title>
    <dc:date>2026-07-11T12:20:34.975749897</dc:date>
    <meta:print-date>2025-06-22T09:06:51.442287100</meta:print-date>
    <meta:printed-by>PDF files</meta:printed-by>
    <meta:document-statistic meta:table-count="4" meta:image-count="0" meta:object-count="0" meta:page-count="1" meta:paragraph-count="21" meta:word-count="494" meta:character-count="2417" meta:non-whitespace-character-count="1948"/>
    <meta:template xlink:type="simple" xlink:actuate="onRequest" xlink:title="BibleStudyTemplate" xlink:href="../../../../AppData/Roaming/LibreOffice/4/user/template/BibleStudyTemplate.ott" meta:date="2025-06-18T21:35:07.475522000"/>
  </office:meta>
</office:document-meta>
</file>