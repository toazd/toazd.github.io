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FreeSans" svg:font-family="FreeSans" style:font-family-generic="system" style:font-pitch="variable"/>
    <style:font-face style:name="IBM Plex Sans" svg:font-family="'IBM Plex Sans'" style:font-adornments="Regular"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Sans NF" svg:font-family="'NotoSans NF'" style:font-family-generic="system" style:font-pitch="variable"/>
    <style:font-face style:name="Source Han Sans SC" svg:font-family="'Source Han Sans SC'"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loext:decorative="false"/>
    </style:style>
    <style:style style:name="gr2" style:family="graphic" style:parent-style-name="standard" style:list-style-name="L1">
      <style:graphic-properties draw:fill="none" loext:fill-use-slide-background="false" draw:textarea-horizontal-align="justify" draw:textarea-vertical-align="middle" draw:auto-grow-height="true" draw:auto-grow-width="true" fo:min-height="0cm" fo:min-width="0cm" style:writing-mode="lr-tb" loext:decorative="false"/>
      <style:paragraph-properties style:writing-mode="lr-tb"/>
    </style:style>
    <style:style style:name="gr3" style:family="graphic" style:parent-style-name="standard" style:list-style-name="L1">
      <style:graphic-properties draw:fill="none" loext:fill-use-slide-background="false" draw:textarea-horizontal-align="center" draw:textarea-vertical-align="middle" draw:auto-grow-height="true" draw:auto-grow-width="true" fo:min-height="0cm" fo:min-width="0cm" style:writing-mode="lr-tb" loext:decorative="false"/>
      <style:paragraph-properties style:writing-mode="lr-tb"/>
    </style:style>
    <style:style style:name="gr4" style:family="graphic" style:parent-style-name="standard" style:list-style-name="L1">
      <style:graphic-properties draw:fill="none" loext:fill-use-slide-background="false" draw:textarea-horizontal-align="justify" draw:textarea-vertical-align="middle" draw:auto-grow-height="true" draw:auto-grow-width="true" fo:min-height="0cm" fo:min-width="0cm" style:writing-mode="lr-tb" loext:decorative="false"/>
      <style:paragraph-properties style:writing-mode="lr-tb"/>
    </style:style>
    <style:style style:name="gr5" style:family="graphic" style:parent-style-name="standard" style:list-style-name="L1">
      <style:graphic-properties draw:fill="none" loext:fill-use-slide-background="false" draw:textarea-horizontal-align="justify" draw:textarea-vertical-align="middle" draw:auto-grow-height="true" draw:auto-grow-width="true" fo:min-height="0cm" fo:min-width="0cm" style:writing-mode="lr-tb" loext:decorative="false"/>
      <style:paragraph-properties style:writing-mode="lr-tb"/>
    </style:style>
    <style:style style:name="gr6" style:family="graphic" style:parent-style-name="standard" style:list-style-name="L1">
      <style:graphic-properties draw:fill="none" loext:fill-use-slide-background="false" draw:textarea-horizontal-align="center" draw:textarea-vertical-align="middle" draw:auto-grow-height="true" draw:auto-grow-width="true" fo:min-height="0cm" fo:min-width="0cm" style:writing-mode="lr-tb" loext:decorative="false"/>
      <style:paragraph-properties style:writing-mode="lr-tb"/>
    </style:style>
    <style:style style:name="gr7" style:family="graphic" style:parent-style-name="standard" style:list-style-name="L1">
      <style:graphic-properties draw:fill="none" loext:fill-use-slide-background="false" draw:textarea-horizontal-align="justify" draw:textarea-vertical-align="middle" draw:auto-grow-height="true" draw:auto-grow-width="true" fo:min-height="0cm" fo:min-width="0cm" style:writing-mode="lr-tb" loext:decorative="false"/>
      <style:paragraph-properties style:writing-mode="lr-tb"/>
    </style:style>
    <style:style style:name="gr8" style:family="graphic" style:parent-style-name="standard" style:list-style-name="L1">
      <style:graphic-properties draw:fill="none" loext:fill-use-slide-background="false" draw:textarea-horizontal-align="center" draw:textarea-vertical-align="middle" draw:auto-grow-height="true" draw:auto-grow-width="true" fo:min-height="0cm" fo:min-width="0cm" style:writing-mode="lr-tb" loext:decorative="false"/>
      <style:paragraph-properties style:writing-mode="lr-tb"/>
    </style:style>
    <style:style style:name="gr9" style:family="graphic" style:parent-style-name="standard" style:list-style-name="L1">
      <style:graphic-properties draw:fill="none" loext:fill-use-slide-background="false" draw:textarea-horizontal-align="justify" draw:textarea-vertical-align="middle" draw:auto-grow-height="true" draw:auto-grow-width="true" fo:min-height="0cm" fo:min-width="0cm" style:writing-mode="lr-tb" loext:decorative="false"/>
      <style:paragraph-properties style:writing-mode="lr-tb"/>
    </style:style>
    <style:style style:name="gr10" style:family="graphic" style:parent-style-name="standard" style:list-style-name="L1">
      <style:graphic-properties draw:fill="none" loext:fill-use-slide-background="false" draw:textarea-horizontal-align="justify" draw:textarea-vertical-align="middle" draw:auto-grow-height="true" draw:auto-grow-width="false" fo:min-height="0cm" fo:min-width="0cm" style:writing-mode="lr-tb" loext:decorative="false"/>
      <style:paragraph-properties style:writing-mode="lr-tb"/>
    </style:style>
    <style:style style:name="P1" style:family="paragraph">
      <loext:graphic-properties draw:fill="none"/>
      <style:paragraph-properties fo:text-align="center"/>
    </style:style>
    <style:style style:name="P2" style:family="paragraph">
      <style:paragraph-properties fo:margin-left="0cm" fo:margin-right="0cm" fo:margin-top="0cm" fo:margin-bottom="0cm" fo:line-height="100%" fo:text-align="left" fo:text-indent="0cm"/>
      <style:text-properties fo:font-size="12pt" style:font-size-asian="12pt" style:font-size-complex="12pt"/>
    </style:style>
    <style:style style:name="P3" style:family="paragraph">
      <loext:graphic-properties draw:fill="none"/>
      <style:paragraph-properties fo:margin-left="0cm" fo:margin-right="0cm" fo:margin-top="0cm" fo:margin-bottom="0cm" fo:line-height="100%" fo:text-align="left" fo:text-indent="0cm" style:writing-mode="lr-tb"/>
      <style:text-properties fo:font-size="12pt" style:font-size-asian="12pt" style:font-size-complex="12pt"/>
    </style:style>
    <style:style style:name="P4" style:family="paragraph">
      <style:paragraph-properties fo:margin-left="0cm" fo:margin-right="0cm" fo:margin-top="0cm" fo:margin-bottom="0cm" fo:line-height="100%" fo:text-align="center" fo:text-indent="0cm"/>
      <style:text-properties fo:font-size="12pt" style:font-size-asian="12pt" style:font-size-complex="12pt"/>
    </style:style>
    <style:style style:name="P5" style:family="paragraph">
      <loext:graphic-properties draw:fill="none"/>
      <style:paragraph-properties fo:margin-left="0cm" fo:margin-right="0cm" fo:margin-top="0cm" fo:margin-bottom="0cm" fo:line-height="100%" fo:text-align="center" fo:text-indent="0cm" style:writing-mode="lr-tb"/>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16pt" fo:font-weight="bold" style:font-size-asian="16pt" style:font-weight-asian="bold" style:font-size-complex="16pt" style:font-weight-complex="bold"/>
    </style:style>
    <style:style style:name="T3" style:family="text">
      <style:text-properties style:text-position="super 58%" fo:font-size="16pt" fo:font-weight="bold" style:font-size-asian="16pt" style:font-weight-asian="bold" style:font-size-complex="16pt"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weight="normal" style:font-size-asian="12pt" style:font-weight-asian="normal" style:font-size-complex="12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onnector draw:style-name="gr1" draw:text-style-name="P1" draw:layer="layout" draw:type="curve" svg:x1="28.385cm" svg:y1="29.75cm" svg:x2="34.417cm" svg:y2="11.283cm" draw:start-shape="id1" draw:start-glue-point="1" draw:end-shape="id2" draw:end-glue-point="3" svg:d="M28385 29750c4525 0 1510-18467 6032-18467" svg:viewBox="0 0 6033 18468">
          <text:p/>
        </draw:connector>
        <draw:custom-shape draw:style-name="gr2" draw:text-style-name="P3" draw:layer="layout" svg:width="24.448cm" svg:height="31.449cm" svg:x="3.937cm" svg:y="54.452cm">
          <text:p text:style-name="P2"><text:span text:style-name="T1">Numbers 33:3-56</text:span></text:p>
          <text:p text:style-name="P2"><text:span text:style-name="T1">12 And they took their journey out of the wilderness of Sin, and encamped in Dophkah.</text:span></text:p>
          <text:p text:style-name="P2"><text:span text:style-name="T1">13 And they departed from Dophkah, and encamped in Alush.</text:span></text:p>
          <text:p text:style-name="P2"><text:span text:style-name="T1">14 And they removed from Alush, and encamped at Rephidim, where was no water for the people to drink.</text:span></text:p>
          <text:p text:style-name="P2"><text:span text:style-name="T1">15 And they departed from Rephidim, and pitched in the wilderness of Sinai.</text:span></text:p>
          <text:p text:style-name="P2"><text:span text:style-name="T1">16 And they removed from the desert of Sinai, and pitched at Kibrothhattaavah.</text:span></text:p>
          <text:p text:style-name="P2"><text:span text:style-name="T1">17 And they departed from Kibrothhattaavah, and encamped at Hazeroth.</text:span></text:p>
          <text:p text:style-name="P2"><text:span text:style-name="T1">18 And they departed from Hazeroth, and pitched in Rithmah.</text:span></text:p>
          <text:p text:style-name="P2"><text:span text:style-name="T1">19 And they departed from Rithmah, and pitched at Rimmonparez.</text:span></text:p>
          <text:p text:style-name="P2"><text:span text:style-name="T1">20 And they departed from Rimmonparez, and pitched in Libnah.</text:span></text:p>
          <text:p text:style-name="P2"><text:span text:style-name="T1">21 And they removed from Libnah, and pitched at Rissah.</text:span></text:p>
          <text:p text:style-name="P2"><text:span text:style-name="T1">22 And they journeyed from Rissah, and pitched in Kehelathah.</text:span></text:p>
          <text:p text:style-name="P2"><text:span text:style-name="T1">23 And they went from Kehelathah, and pitched in mount Shapher.</text:span></text:p>
          <text:p text:style-name="P2"><text:span text:style-name="T1">24 And they removed from mount Shapher, and encamped in Haradah.</text:span></text:p>
          <text:p text:style-name="P2"><text:span text:style-name="T1">25 And they removed from Haradah, and pitched in Makheloth.</text:span></text:p>
          <text:p text:style-name="P2"><text:span text:style-name="T1">26 And they removed from Makheloth, and encamped at Tahath.</text:span></text:p>
          <text:p text:style-name="P2"><text:span text:style-name="T1">27 And they departed from Tahath, and pitched at Tarah.</text:span></text:p>
          <text:p text:style-name="P2"><text:span text:style-name="T1">28 And they removed from Tarah, and pitched in Mithcah.</text:span></text:p>
          <text:p text:style-name="P2"><text:span text:style-name="T1">29 And they went from Mithcah, and pitched in Hashmonah.</text:span></text:p>
          <text:p text:style-name="P2"><text:span text:style-name="T1">30 And they departed from Hashmonah, and encamped at Moseroth.</text:span></text:p>
          <text:p text:style-name="P2"><text:span text:style-name="T1">31 And they departed from Moseroth, and pitched in Benejaakan.</text:span></text:p>
          <text:p text:style-name="P2"><text:span text:style-name="T1">32 And they removed from Benejaakan, and encamped at Horhagidgad.</text:span></text:p>
          <text:p text:style-name="P2"><text:span text:style-name="T1">33 And they went from Horhagidgad, and pitched in Jotbathah.</text:span></text:p>
          <text:p text:style-name="P2"><text:span text:style-name="T1">34 And they removed from Jotbathah, and encamped at Ebronah.</text:span></text:p>
          <text:p text:style-name="P2"><text:span text:style-name="T1">35 And they departed from Ebronah, and encamped at Eziongaber.</text:span></text:p>
          <text:p text:style-name="P2"><text:span text:style-name="T1">36 And they removed from Eziongaber, and pitched in the wilderness of Zin, which is Kadesh.</text:span></text:p>
          <text:p text:style-name="P2"><text:span text:style-name="T1">37 And they removed from Kadesh, and pitched in mount Hor, in the edge of the land of Edom.</text:span></text:p>
          <text:p text:style-name="P2"><text:span text:style-name="T1">38 And Aaron the priest went up into mount Hor at the commandment of the LORD, and died there, in the fortieth year after the children of Israel were come out of the land of Egypt, in the first day of the fifth month.</text:span></text:p>
          <text:p text:style-name="P2"><text:span text:style-name="T1">39 And Aaron was an hundred and twenty and three years old when he died in mount Hor.</text:span></text:p>
          <text:p text:style-name="P2"><text:span text:style-name="T1">40 And king Arad the Canaanite, which dwelt in the south in the land of Canaan, heard of the coming of the children of Israel.</text:span></text:p>
          <text:p text:style-name="P2"><text:span text:style-name="T1">41 And they departed from mount Hor, and pitched in Zalmonah.</text:span></text:p>
          <text:p text:style-name="P2"><text:span text:style-name="T1">42 And they departed from Zalmonah, and pitched in Punon.</text:span></text:p>
          <text:p text:style-name="P2"><text:span text:style-name="T1">43 And they departed from Punon, and pitched in Oboth.</text:span></text:p>
          <text:p text:style-name="P2"><text:span text:style-name="T1">44 And they departed from Oboth, and pitched in Ijeabarim, in the border of Moab.</text:span></text:p>
          <text:p text:style-name="P2"><text:span text:style-name="T1">45 And they departed from Iim, and pitched in Dibongad.</text:span></text:p>
          <text:p text:style-name="P2"><text:span text:style-name="T1">46 And they removed from Dibongad, and encamped in Almondiblathaim.</text:span></text:p>
          <text:p text:style-name="P2"><text:span text:style-name="T1">47 And they removed from Almondiblathaim, and pitched in the mountains of Abarim, before Nebo.</text:span></text:p>
          <text:p text:style-name="P2"><text:span text:style-name="T1">48 And they departed from the mountains of Abarim, and pitched in the plains of Moab by Jordan near Jericho.</text:span></text:p>
          <text:p text:style-name="P2"><text:span text:style-name="T1">49 And they pitched by Jordan, from Bethjesimoth even unto Abelshittim in the plains of Moab.</text:span></text:p>
          <text:p text:style-name="P2"><text:span text:style-name="T1"/></text:p>
          <text:p text:style-name="P2"><text:span text:style-name="T1">Joshua 3:1-2</text:span></text:p>
          <text:p text:style-name="P2"><text:span text:style-name="T1">1 And Joshua rose early in the morning; and they removed from Shittim, and came to Jordan, he and all the children of Israel, and lodged there before they passed over.</text:span></text:p>
          <text:p text:style-name="P2"><text:span text:style-name="T1">2 And it came to pass after three days, that the officers went through the host;</text:span></text:p>
          <text:p text:style-name="P2"><text:span text:style-name="T1"/></text:p>
          <text:p text:style-name="P2"><text:span text:style-name="T1">Joshua 4:19</text:span></text:p>
          <text:p text:style-name="P2"><text:span text:style-name="T1">And the people came up out of Jordan on the tenth day of the first month, and encamped in Gilgal, in the east border of Jericho.</text:span></text:p>
          <text:p text:style-name="P2"><text:span text:style-name="T1"/></text:p>
          <text:p text:style-name="P2"><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 draw:text-style-name="P5" xml:id="id2" draw:id="id2" draw:layer="layout" svg:width="26.352cm" svg:height="19.221cm" svg:x="34.417cm" svg:y="1.673cm">
          <text:p text:style-name="P4"><text:span text:style-name="T2">15</text:span><text:span text:style-name="T3">th</text:span><text:span text:style-name="T2"> day, 1</text:span><text:span text:style-name="T3">st</text:span><text:span text:style-name="T2"> month, (1</text:span><text:span text:style-name="T3">st</text:span><text:span text:style-name="T2"> year)</text:span></text:p>
          <text:p text:style-name="P4"><text:span text:style-name="T4"/></text:p>
          <text:p text:style-name="P4"><text:span text:style-name="T4">Rameses → Succoth</text:span></text:p>
          <text:p text:style-name="P2"><text:span text:style-name="T1"/></text:p>
          <text:p text:style-name="P2"><text:span text:style-name="T1">Exodus 12:37-51 (Genesis 35:27, 37:14, 47:11)</text:span></text:p>
          <text:p text:style-name="P2"><text:span text:style-name="T1">37 And the children of Israel journeyed from Rameses to Succoth, about six hundred thousand on foot that were men, beside children.</text:span></text:p>
          <text:p text:style-name="P2"><text:span text:style-name="T1">38 And a mixed multitude went up also with them; and flocks, and herds, even very much cattle.</text:span></text:p>
          <text:p text:style-name="P2"><text:span text:style-name="T1">39 And they baked unleavened cakes of the dough which they brought forth out of Egypt, for it was not leavened; because they were thrust out of Egypt, and could not tarry, neither had they prepared for themselves any victual.</text:span></text:p>
          <text:p text:style-name="P2"><text:span text:style-name="T1">40 Now the sojourning of the children of Israel, who dwelt in Egypt, was four hundred and thirty years.</text:span></text:p>
          <text:p text:style-name="P2"><text:span text:style-name="T1">41 And it came to pass at the end of the four hundred and thirty years, even the selfsame day it came to pass, that all the hosts of the LORD went out from the land of Egypt.</text:span></text:p>
          <text:p text:style-name="P2"><text:span text:style-name="T1">42 It is a night to be much observed unto the LORD for bringing them out from the land of Egypt: this is that night of the LORD to be observed of all the children of Israel in their generations.</text:span></text:p>
          <text:p text:style-name="P2"><text:span text:style-name="T1"/></text:p>
          <text:p text:style-name="P4"><text:span text:style-name="T4">The ordinance of the passover</text:span></text:p>
          <text:p text:style-name="P2"><text:span text:style-name="T1"/></text:p>
          <text:p text:style-name="P2"><text:span text:style-name="T1">43 And the LORD said unto Moses and Aaron, This is the ordinance of the passover: There shall no stranger eat thereof:</text:span></text:p>
          <text:p text:style-name="P2"><text:span text:style-name="T1">44 But every man's servant that is bought for money, when thou hast circumcised him, then shall he eat thereof.</text:span></text:p>
          <text:p text:style-name="P2"><text:span text:style-name="T1">45 A foreigner and an hired servant shall not eat thereof.</text:span></text:p>
          <text:p text:style-name="P2"><text:span text:style-name="T1">46 In one house shall it be eaten; thou shalt not carry forth ought of the flesh abroad out of the house; neither shall ye break a bone thereof.</text:span></text:p>
          <text:p text:style-name="P2"><text:span text:style-name="T1">47 All the congregation of Israel shall keep it.</text:span></text:p>
          <text:p text:style-name="P2"><text:span text:style-name="T1">48 And when a stranger shall sojourn with thee, and will keep the passover to the LORD, let all his males be circumcised, and then let him come near and keep it; and he shall be as one that is born in the land: for no uncircumcised person shall eat thereof.</text:span></text:p>
          <text:p text:style-name="P2"><text:span text:style-name="T1">49 One law shall be to him that is homeborn, and unto the stranger that sojourneth among you.</text:span></text:p>
          <text:p text:style-name="P2"><text:span text:style-name="T1">50 Thus did all the children of Israel; as the LORD commanded Moses and Aaron, so did they.</text:span></text:p>
          <text:p text:style-name="P2"><text:span text:style-name="T1">51 And it came to pass the selfsame day, that the LORD did bring the children of Israel out of the land of Egypt by their armi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 draw:id="id1" draw:layer="layout" svg:width="24.448cm" svg:height="4.584cm" svg:x="3.937cm" svg:y="27.458cm">
          <text:p text:style-name="P2"><text:span text:style-name="T1">Numbers 33:3-5</text:span></text:p>
          <text:p text:style-name="P2"><text:span text:style-name="T1">3 And they departed from </text:span><text:span text:style-name="T5">Rameses</text:span><text:span text:style-name="T1"> in the first month, on the fifteenth day of the first month; on the morrow after the passover the children of Israel went out with an high hand in the sight of all the Egyptians.</text:span></text:p>
          <text:p text:style-name="P2"><text:span text:style-name="T1">4 For the Egyptians buried all their firstborn, which the LORD had smitten among them: upon their gods also the LORD executed judgments.</text:span></text:p>
          <text:p text:style-name="P2"><text:span text:style-name="T1">5 And the children of Israel removed from Rameses, and pitched in </text:span><text:span text:style-name="T5">Succoth</text:span><text:span text:style-name="T1">.</text:span></text:p>
          <text:p text:style-name="P2"><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 draw:text-style-name="P3" xml:id="id3" draw:id="id3" draw:layer="layout" svg:width="24.448cm" svg:height="5.199cm" svg:x="3.937cm" svg:y="32.655cm">
          <text:p text:style-name="P2"><text:span text:style-name="T1">Numbers 33:6-9</text:span></text:p>
          <text:p text:style-name="P2"><text:span text:style-name="T1">6 And they departed from </text:span><text:span text:style-name="T5">Succoth</text:span><text:span text:style-name="T1">, and pitched in </text:span><text:span text:style-name="T5">Etham</text:span><text:span text:style-name="T1">, which is in the edge of the wilderness.</text:span></text:p>
          <text:p text:style-name="P2"><text:span text:style-name="T1">7 And they removed from </text:span><text:span text:style-name="T5">Etham</text:span><text:span text:style-name="T1">, and turned again unto </text:span><text:span text:style-name="T5">Pihahiroth</text:span><text:span text:style-name="T1">, which is before Baalzephon: and they pitched before Migdol.</text:span></text:p>
          <text:p text:style-name="P2"><text:span text:style-name="T1">8 And they departed from before </text:span><text:span text:style-name="T5">Pihahiroth</text:span><text:span text:style-name="T1">, and passed through the midst of the sea into the wilderness, and went three days' journey in the wilderness of </text:span><text:span text:style-name="T6">Etham</text:span><text:span text:style-name="T1">, and pitched in </text:span><text:span text:style-name="T5">Marah</text:span><text:span text:style-name="T1">.</text:span></text:p>
          <text:p text:style-name="P2"><text:span text:style-name="T1">9 And they removed from </text:span><text:span text:style-name="T5">Marah</text:span><text:span text:style-name="T1">, and came unto </text:span><text:span text:style-name="T5">Elim</text:span><text:span text:style-name="T1">: and in Elim were twelve fountains of water, and threescore and ten palm trees; and they pitched the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5" xml:id="id4" draw:id="id4" draw:layer="layout" svg:width="26.352cm" svg:height="19.638cm" svg:x="34.417cm" svg:y="21.099cm">
          <text:p text:style-name="P4"><text:span text:style-name="T4">Etham → Pihahiroth</text:span></text:p>
          <text:p text:style-name="P2"><text:span text:style-name="T1"/></text:p>
          <text:p text:style-name="P2"><text:span text:style-name="T1">Exodus 13:20</text:span></text:p>
          <text:p text:style-name="P2"><text:span text:style-name="T1">And they took their journey from Succoth, and encamped in </text:span><text:span text:style-name="T5">Etham</text:span><text:span text:style-name="T1">, in the edge of the wilderness.</text:span></text:p>
          <text:p text:style-name="P2"><text:span text:style-name="T1"/></text:p>
          <text:p text:style-name="P2"><text:span text:style-name="T1">Exodus 14:2-9</text:span></text:p>
          <text:p text:style-name="P2"><text:span text:style-name="T1">2 Speak unto the children of Israel, that they turn and encamp before </text:span><text:span text:style-name="T5">Pihahiroth</text:span><text:span text:style-name="T1">, between Migdol and the sea, over against Baalzephon: before it shall ye encamp by the sea.</text:span></text:p>
          <text:p text:style-name="P2"><text:span text:style-name="T1">...</text:span></text:p>
          <text:p text:style-name="P2"><text:span text:style-name="T1">9 But the Egyptians pursued after them, all the horses and chariots of Pharaoh, and his horsemen, and his army, and overtook them encamping by the sea, beside </text:span><text:span text:style-name="T5">Pihahiroth</text:span><text:span text:style-name="T1">, before Baalzephon.</text:span></text:p>
          <text:p text:style-name="P2"><text:span text:style-name="T1"/></text:p>
          <text:p text:style-name="P4"><text:span text:style-name="T4">Red sea crossing</text:span></text:p>
          <text:p text:style-name="P2"><text:span text:style-name="T1"/></text:p>
          <text:p text:style-name="P2"><text:span text:style-name="T1">Exodus 15-16</text:span></text:p>
          <text:p text:style-name="P2"><text:span text:style-name="T1"/></text:p>
          <text:p text:style-name="P4"><text:span text:style-name="T4">Pihahiroth → Marah → Elim</text:span></text:p>
          <text:p text:style-name="P2"><text:span text:style-name="T1"/></text:p>
          <text:p text:style-name="P2"><text:span text:style-name="T1">Exodus 15:22-27</text:span></text:p>
          <text:p text:style-name="P2"><text:span text:style-name="T1">22 So Moses brought Israel from the </text:span><text:span text:style-name="T5">Red sea</text:span><text:span text:style-name="T1">, and they went out into the </text:span><text:span text:style-name="T5">wilderness of Shur</text:span><text:span text:style-name="T1">; and they went three days in the wilderness, and found no water.</text:span></text:p>
          <text:p text:style-name="P2"><text:span text:style-name="T1">23 And when they came to </text:span><text:span text:style-name="T5">Marah</text:span><text:span text:style-name="T1">, they could not drink of the waters of </text:span><text:span text:style-name="T5">Marah</text:span><text:span text:style-name="T1">, for they were bitter: therefore the name of it was called </text:span><text:span text:style-name="T5">Marah</text:span><text:span text:style-name="T1">.</text:span></text:p>
          <text:p text:style-name="P2"><text:span text:style-name="T1">24 And the people murmured against Moses, saying, What shall we drink?</text:span></text:p>
          <text:p text:style-name="P2"><text:span text:style-name="T1">25 And he cried unto the LORD; and the LORD shewed him a tree, which when he had cast into the waters, the waters were made sweet: there he made for them a statute and an ordinance, and there he proved them,</text:span></text:p>
          <text:p text:style-name="P2"><text:span text:style-name="T1">26 And said, If thou wilt diligently hearken to the voice of the LORD thy God, and wilt do that which is right in his sight, and wilt give ear to his commandments, and keep all his statutes, I will put none of these diseases upon thee, which I have brought upon the Egyptians: for I am the LORD that healeth thee.</text:span></text:p>
          <text:p text:style-name="P2"><text:span text:style-name="T1">27 And they came to </text:span><text:span text:style-name="T5">Elim</text:span><text:span text:style-name="T1">, where were twelve wells of water, and threescore and ten palm trees: and they encamped there by the wa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 draw:text-style-name="P3" xml:id="id7" draw:id="id7" draw:layer="layout" svg:width="24.448cm" svg:height="1.509cm" svg:x="3.937cm" svg:y="38.8cm">
          <text:p text:style-name="P2"><text:span text:style-name="T1">Numbers 33:10</text:span></text:p>
          <text:p text:style-name="P2"><text:span text:style-name="T1">10 And they removed from </text:span><text:span text:style-name="T5">Elim</text:span><text:span text:style-name="T1">, and encamped by the </text:span><text:span text:style-name="T5">Red sea</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 draw:text-style-name="P1" draw:layer="layout" draw:type="curve" svg:x1="28.385cm" svg:y1="35.254cm" svg:x2="34.417cm" svg:y2="30.918cm" draw:start-shape="id3" draw:start-glue-point="1" draw:end-shape="id4" draw:end-glue-point="3" svg:d="M28385 35254c4525 0 1510-4336 6032-4336" svg:viewBox="0 0 6033 4337">
          <text:p/>
        </draw:connector>
        <draw:custom-shape draw:style-name="gr8" draw:text-style-name="P5" xml:id="id6" draw:id="id6" draw:layer="layout" svg:width="26.352cm" svg:height="14.299cm" svg:x="34.417cm" svg:y="43.768cm">
          <text:p text:style-name="P4"><text:span text:style-name="T2">15</text:span><text:span text:style-name="T3">th</text:span><text:span text:style-name="T2"> day, 2</text:span><text:span text:style-name="T3">nd</text:span><text:span text:style-name="T2"> month, (1</text:span><text:span text:style-name="T3">st</text:span><text:span text:style-name="T2"> year)</text:span></text:p>
          <text:p text:style-name="P4"><text:span text:style-name="T4"/></text:p>
          <text:p text:style-name="P4"><text:span text:style-name="T4">Elim → wilderness of Sin</text:span></text:p>
          <text:p text:style-name="P2"><text:span text:style-name="T1">Exodus 16:1</text:span></text:p>
          <text:p text:style-name="P2"><text:span text:style-name="T1">And they took their journey from </text:span><text:span text:style-name="T5">Elim</text:span><text:span text:style-name="T1">, and all the congregation of the children of Israel came unto the </text:span><text:span text:style-name="T5">wilderness of Sin</text:span><text:span text:style-name="T1">, which is between </text:span><text:span text:style-name="T5">Elim</text:span><text:span text:style-name="T1"> and Sinai, on the fifteenth day of the second month after their departing out of the land of Egypt.</text:span></text:p>
          <text:p text:style-name="P2"><text:span text:style-name="T1"/></text:p>
          <text:p text:style-name="P4"><text:span text:style-name="T4">Manna from heaven after complaining for no reason (John 6:32,33)</text:span></text:p>
          <text:p text:style-name="P2"><text:span text:style-name="T1"/></text:p>
          <text:p text:style-name="P2"><text:span text:style-name="T1">Exodus 16:2-7</text:span></text:p>
          <text:p text:style-name="P2"><text:span text:style-name="T1">2 And the whole congregation of the children of Israel murmured against Moses and Aaron in </text:span><text:span text:style-name="T5">the wilderness</text:span><text:span text:style-name="T1">:</text:span></text:p>
          <text:p text:style-name="P2"><text:span text:style-name="T1">3 And the children of Israel said unto them, Would to God we had died by the hand of the LORD in the land of Egypt, when we sat by the flesh pots, and when we did eat bread to the full; for ye have brought us forth into this wilderness, to kill this whole assembly with hunger.</text:span></text:p>
          <text:p text:style-name="P2"><text:span text:style-name="T1">4 Then said the LORD unto Moses, Behold, I will rain bread from heaven for you; and the people shall go out and gather a certain rate every day, that I may prove them, whether they will walk in my law, or no.</text:span></text:p>
          <text:p text:style-name="P2"><text:span text:style-name="T1">5 And it shall come to pass, that on the sixth day they shall prepare that which they bring in; and it shall be twice as much as they gather daily.</text:span></text:p>
          <text:p text:style-name="P2"><text:span text:style-name="T1">6 And Moses and Aaron said unto all the children of Israel, At even, then ye shall know that the LORD hath brought you out from the land of Egypt:</text:span></text:p>
          <text:p text:style-name="P2"><text:span text:style-name="T1">7 And in the morning, then ye shall see the glory of the LORD; for that he heareth your murmurings against the LORD: and what are we, that ye murmur against 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 draw:text-style-name="P1" draw:layer="layout" draw:type="curve" svg:x1="28.385cm" svg:y1="41.754cm" svg:x2="34.417cm" svg:y2="50.917cm" draw:start-shape="id5" draw:start-glue-point="1" draw:end-shape="id6" svg:d="M28385 41754c4525 0 1510 9163 6032 9163" svg:viewBox="0 0 6033 9164">
          <text:p/>
        </draw:connector>
        <draw:custom-shape draw:style-name="gr9" draw:text-style-name="P3" xml:id="id5" draw:id="id5" draw:layer="layout" svg:width="24.448cm" svg:height="1.509cm" svg:x="3.937cm" svg:y="41cm">
          <text:p text:style-name="P2"><text:span text:style-name="T1">Numbers 33:11</text:span></text:p>
          <text:p text:style-name="P2"><text:span text:style-name="T1">11 And they removed from the </text:span><text:span text:style-name="T5">Red sea</text:span><text:span text:style-name="T1">, and encamped in the </text:span><text:span text:style-name="T5">wilderness of Sin</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5" xml:id="id8" draw:id="id8" draw:layer="layout" svg:width="26.34cm" svg:height="2.222cm" svg:x="34.417cm" svg:y="40.946cm">
          <text:p text:style-name="P4"><text:span text:style-name="T4">Elim → by the Red sea</text:span></text:p>
          <text:p text:style-name="P2"><text:span text:style-name="T1"/></text:p>
          <text:p text:style-name="P2"><text:span text:style-name="T1">Omitted (Exodus 15:27-16: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 draw:text-style-name="P1" draw:layer="layout" draw:type="curve" svg:x1="28.385cm" svg:y1="39.554cm" svg:x2="34.417cm" svg:y2="42.057cm" draw:start-shape="id7" draw:start-glue-point="1" draw:end-shape="id8" draw:end-glue-point="3" svg:d="M28385 39554c4525 0 1510 2503 6032 2503" svg:viewBox="0 0 6033 2504">
          <text:p/>
        </draw:connector>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FreeSans" svg:font-family="FreeSans" style:font-family-generic="system" style:font-pitch="variable"/>
    <style:font-face style:name="IBM Plex Sans" svg:font-family="'IBM Plex Sans'" style:font-adornments="Regular"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Sans NF" svg:font-family="'NotoSans NF'" style:font-family-generic="system" style:font-pitch="variable"/>
    <style:font-face style:name="Source Han Sans SC" svg:font-family="'Source Han Sans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IBM Plex Sans" fo:font-family="'IBM Plex Sans'" style:font-style-name="Regular" style:font-family-generic="swiss" style:font-pitch="variable" fo:font-size="12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Sans NF" style:font-family-complex="'NotoSans NF'"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762cm" fo:margin-bottom="0.762cm" fo:margin-left="0.762cm" fo:margin-right="0.762cm" fo:page-width="127cm" fo:page-height="12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5T11:25:18.877634705</meta:creation-date>
    <meta:generator>LibreOffice/26.2.4.2$Linux_X86_64 LibreOffice_project/64a984c51f4702dbd3710b13428c673a2f1292e7</meta:generator>
    <dc:date>2026-07-11T12:20:50.937414185</dc:date>
    <meta:editing-duration>PT2H47M18S</meta:editing-duration>
    <meta:editing-cycles>65</meta:editing-cycles>
    <meta:document-statistic meta:object-count="13"/>
  </office:meta>
</office:document-meta>
</file>