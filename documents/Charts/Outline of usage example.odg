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Gabriela Nerd Font" svg:font-family="'Gabriela Nerd Font'" style:font-pitch="variable"/>
    <style:font-face style:name="Galaxie Unicode Hebrew" svg:font-family="'Galaxie Unicode Hebrew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Hebrew" svg:font-family="'Noto Sans Hebrew'" style:font-family-generic="swiss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18cm" svg:stroke-color="#000000" draw:marker-start-width="0.227cm" draw:marker-end-width="0.227cm" draw:textarea-horizontal-align="center" draw:textarea-vertical-align="bottom" draw:auto-grow-height="false" fo:min-height="1.063cm" fo:min-width="1.562cm" fo:padding-top="0.134cm" fo:padding-bottom="0.134cm" fo:padding-left="0.259cm" fo:padding-right="0.259cm" loext:decorative="false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878cm" fo:min-width="2.203cm" fo:padding-top="0.134cm" fo:padding-bottom="0.134cm" fo:padding-left="0.259cm" fo:padding-right="0.259cm" loext:decorative="false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878cm" fo:min-width="2.215cm" fo:padding-top="0.134cm" fo:padding-bottom="0.134cm" fo:padding-left="0.259cm" fo:padding-right="0.259cm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729fcf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729fcf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729fcf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729fcf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alaxie Unicode Hebrew" fo:font-size="14pt" fo:font-style="normal" fo:text-shadow="none" style:text-underline-style="none" fo:font-weight="normal" style:letter-kerning="true" style:font-name-asian="Microsoft YaHei1" style:font-size-asian="14pt" style:font-style-asian="normal" style:font-weight-asian="normal" style:font-name-complex="Galaxie Unicode Hebr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Noto Sans Hebr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Gabriela Nerd Fo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xml:id="id1" draw:id="id1" draw:layer="layout" svg:width="2.222cm" svg:height="1.473cm" svg:x="1.317cm" svg:y="2.993cm">
            <text:p text:style-name="P1"><text:span text:style-name="T1">שֶׂה</text:span></text:p>
            <text:p text:style-name="P1"><text:span text:style-name="T2">H77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1" xml:id="id2" draw:id="id2" draw:layer="layout" svg:width="2.845cm" svg:height="1.27cm" svg:x="4.504cm" svg:y="0.718cm">
            <text:p text:style-name="P1"><text:span text:style-name="T3">Gen 22:7</text:span></text:p>
            <text:p text:style-name="P1">lam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4" draw:text-style-name="P1" xml:id="id5" draw:id="id5" draw:layer="layout" svg:width="2.857cm" svg:height="1.27cm" svg:x="4.492cm" svg:y="2.306cm">
            <text:p text:style-name="P1"><text:span text:style-name="T3">Gen 30:32</text:span></text:p>
            <text:p text:style-name="P1">cattl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2.845cm" svg:height="1.27cm" svg:x="4.504cm" svg:y="3.893cm">
            <text:p text:style-name="P1"><text:span text:style-name="T3">Exo 22:1</text:span></text:p>
            <text:p text:style-name="P1">shee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2.845cm" svg:height="1.27cm" svg:x="4.504cm" svg:y="5.481cm">
            <text:p text:style-name="P1"><text:span text:style-name="T3">Lev 22:28</text:span></text:p>
            <text:p text:style-name="P1">ew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onnector draw:style-name="gr5" draw:text-style-name="P2" draw:layer="layout" draw:type="line" svg:x1="2.428cm" svg:y1="2.993cm" svg:x2="4.504cm" svg:y2="1.353cm" draw:start-shape="id1" draw:start-glue-point="0" draw:end-shape="id2" draw:end-glue-point="3" svg:d="M2428 2993l2076-1640" svg:viewBox="0 0 2077 1641">
            <text:p/>
          </draw:connector>
          <draw:connector draw:style-name="gr6" draw:text-style-name="P2" draw:layer="layout" draw:type="line" svg:x1="3.539cm" svg:y1="3.729cm" svg:x2="4.504cm" svg:y2="4.528cm" draw:start-shape="id1" draw:start-glue-point="1" draw:end-shape="id3" draw:end-glue-point="3" svg:d="M3539 3729l965 799" svg:viewBox="0 0 966 800">
            <text:p/>
          </draw:connector>
          <draw:connector draw:style-name="gr7" draw:text-style-name="P2" draw:layer="layout" draw:type="line" svg:x1="2.428cm" svg:y1="4.466cm" svg:x2="4.504cm" svg:y2="6.116cm" draw:start-shape="id1" draw:start-glue-point="2" draw:end-shape="id4" draw:end-glue-point="3" svg:d="M2428 4466l2076 1650" svg:viewBox="0 0 2077 1651">
            <text:p/>
          </draw:connector>
          <draw:connector draw:style-name="gr8" draw:text-style-name="P2" draw:layer="layout" draw:type="line" svg:x1="3.539cm" svg:y1="3.729cm" svg:x2="4.492cm" svg:y2="2.941cm" draw:start-shape="id1" draw:start-glue-point="1" draw:end-shape="id5" draw:end-glue-point="3" svg:d="M3539 3729l953-788" svg:viewBox="0 0 954 78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Gabriela Nerd Font" svg:font-family="'Gabriela Nerd Font'" style:font-pitch="variable"/>
    <style:font-face style:name="Galaxie Unicode Hebrew" svg:font-family="'Galaxie Unicode Hebrew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Hebrew" svg:font-family="'Noto Sans Hebrew'" style:font-family-generic="swiss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rame_20_Contents" style:display-name="Frame Contents" style:family="graphic">
      <style:paragraph-properties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4T12:23:21.269631100</meta:creation-date>
    <dc:date>2025-06-14T13:04:43.362650900</dc:date>
    <meta:editing-duration>PT41M18S</meta:editing-duration>
    <meta:editing-cycles>8</meta:editing-cycles>
    <meta:generator>LibreOffice/25.2.4.3$Windows_X86_64 LibreOffice_project/33e196637044ead23f5c3226cde09b47731f7e27</meta:generator>
    <meta:document-statistic meta:object-count="10"/>
  </office:meta>
</office:document-meta>
</file>