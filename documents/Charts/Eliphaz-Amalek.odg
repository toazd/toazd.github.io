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4cm" fo:min-width="1.568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d7d7" draw:textarea-horizontal-align="justify" draw:textarea-vertical-align="middle" draw:auto-grow-height="false" fo:min-height="1.184cm" fo:min-width="1.568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184cm" fo:min-width="2.09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d7d7" draw:textarea-horizontal-align="justify" draw:textarea-vertical-align="middle" draw:auto-grow-height="false" fo:min-height="1.184cm" fo:min-width="1.846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84cm" fo:min-width="2.351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03cm" fo:min-width="5.215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d7d7"/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222cm" svg:height="1.588cm" svg:x="2.905cm" svg:y="2.587cm">
          <text:p text:style-name="P1">Esa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2" draw:id="id2" draw:layer="layout" svg:width="2.222cm" svg:height="1.588cm" svg:x="6.306cm" svg:y="2.588cm">
          <text:p text:style-name="P1">Ada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1" xml:id="id3" draw:id="id3" draw:layer="layout" svg:x1="5.127cm" svg:y1="3.381cm" svg:x2="6.306cm" svg:y2="3.382cm" draw:start-shape="id1" draw:start-glue-point="1" draw:end-shape="id2" draw:end-glue-point="3" svg:d="M5127 3381h590v1h589" svg:viewBox="0 0 1180 2">
          <text:p/>
        </draw:connector>
        <draw:custom-shape draw:style-name="gr4" draw:text-style-name="P2" xml:id="id4" draw:id="id4" draw:layer="layout" svg:width="2.744cm" svg:height="1.588cm" svg:x="4.344cm" svg:y="4.788cm">
          <text:p text:style-name="P1">Elipha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1" draw:layer="layout" svg:x1="5.717cm" svg:y1="3.381cm" svg:x2="5.716cm" svg:y2="4.788cm" draw:start-shape="id3" draw:start-glue-point="0" draw:end-shape="id4" draw:end-glue-point="0" svg:d="M5717 3381v717h-1v690" svg:viewBox="0 0 2 1408">
          <text:p/>
        </draw:connector>
        <draw:custom-shape draw:style-name="gr5" draw:text-style-name="P3" xml:id="id5" draw:id="id5" draw:layer="layout" svg:width="2.5cm" svg:height="1.588cm" svg:x="7.707cm" svg:y="4.789cm">
          <text:p text:style-name="P1">Tim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1" xml:id="id6" draw:id="id6" draw:layer="layout" svg:x1="7.088cm" svg:y1="5.582cm" svg:x2="7.707cm" svg:y2="5.583cm" draw:start-shape="id4" draw:start-glue-point="1" draw:end-shape="id5" draw:end-glue-point="3" svg:d="M7088 5582h310v1h309" svg:viewBox="0 0 620 2">
          <text:p/>
        </draw:connector>
        <draw:custom-shape draw:style-name="gr6" draw:text-style-name="P2" xml:id="id7" draw:id="id7" draw:layer="layout" svg:width="3.005cm" svg:height="1.588cm" svg:x="5.898cm" svg:y="7.219cm">
          <text:p text:style-name="P1">Amale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1" draw:layer="layout" svg:x1="7.398cm" svg:y1="5.582cm" svg:x2="7.4cm" svg:y2="7.219cm" draw:start-shape="id6" draw:start-glue-point="0" draw:end-shape="id7" draw:end-glue-point="0" svg:d="M7398 5582v832h2v805" svg:viewBox="0 0 3 1638">
          <text:p/>
        </draw:connector>
        <draw:custom-shape draw:style-name="gr7" draw:text-style-name="P4" draw:layer="layout" svg:width="5.715cm" svg:height="0.953cm" svg:x="3.54cm" svg:y="1.317cm">
          <text:p text:style-name="P1">Genesis 36:12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9T07:30:44.577000000</meta:creation-date>
    <dc:date>2026-07-11T12:31:51.483804863</dc:date>
    <meta:editing-duration>PT1M40S</meta:editing-duration>
    <meta:editing-cycles>4</meta:editing-cycles>
    <meta:generator>LibreOffice/26.2.4.2$Linux_X86_64 LibreOffice_project/64a984c51f4702dbd3710b13428c673a2f1292e7</meta:generator>
    <meta:document-statistic meta:object-count="10"/>
  </office:meta>
</office:document-meta>
</file>