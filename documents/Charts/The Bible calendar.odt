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7.9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7.9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7.9in" table:align="margins"/>
    </style:style>
    <style:style style:name="Table8.A" style:family="table-column">
      <style:table-column-properties style:column-width="7.9in" style:rel-column-width="65535*"/>
    </style:style>
    <style:style style:name="Table8.A1" style:family="table-cell">
      <style:table-cell-properties fo:padding="0.0382in" fo:border="0.5pt solid #000000"/>
    </style:style>
    <style:style style:name="Table9" style:family="table">
      <style:table-properties style:width="7.9in" table:align="margins"/>
    </style:style>
    <style:style style:name="Table9.A" style:family="table-column">
      <style:table-column-properties style:column-width="7.9in" style:rel-column-width="65535*"/>
    </style:style>
    <style:style style:name="Table9.A1" style:family="table-cell">
      <style:table-cell-properties fo:padding="0.0382in" fo:border="0.5pt solid #000000"/>
    </style:style>
    <style:style style:name="Table10" style:family="table">
      <style:table-properties style:width="7.9in" table:align="margins"/>
    </style:style>
    <style:style style:name="Table10.A" style:family="table-column">
      <style:table-column-properties style:column-width="7.9in" style:rel-column-width="65535*"/>
    </style:style>
    <style:style style:name="Table10.A1" style:family="table-cell">
      <style:table-cell-properties fo:padding="0.0382in" fo:border-left="0.5pt solid #000000" fo:border-right="0.5pt solid #000000" fo:border-top="0.5pt solid #000000" fo:border-bottom="none"/>
    </style:style>
    <style:style style:name="Table10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7.9in" table:align="margins"/>
    </style:style>
    <style:style style:name="Table11.A" style:family="table-column">
      <style:table-column-properties style:column-width="7.9in" style:rel-column-width="65535*"/>
    </style:style>
    <style:style style:name="Table11.A1" style:family="table-cell">
      <style:table-cell-properties fo:padding="0.0382in" fo:border="0.5pt solid #000000"/>
    </style:style>
    <style:style style:name="Table12" style:family="table">
      <style:table-properties style:width="7.9in" table:align="margins"/>
    </style:style>
    <style:style style:name="Table12.A" style:family="table-column">
      <style:table-column-properties style:column-width="7.9in" style:rel-column-width="65535*"/>
    </style:style>
    <style:style style:name="Table12.A1" style:family="table-cell">
      <style:table-cell-properties fo:padding="0.0382in" fo:border="0.5pt solid #000000"/>
    </style:style>
    <style:style style:name="P1" style:family="paragraph" style:parent-style-name="Table_20_Contents">
      <style:text-properties officeooo:paragraph-rsid="000d7ae5"/>
    </style:style>
    <style:style style:name="P2" style:family="paragraph" style:parent-style-name="Text_20_body" style:list-style-name="L1">
      <style:text-properties officeooo:rsid="000e9fd0" officeooo:paragraph-rsid="000e9fd0"/>
    </style:style>
    <style:style style:name="P3" style:family="paragraph" style:parent-style-name="Table_20_Contents">
      <style:text-properties officeooo:paragraph-rsid="000edeb4"/>
    </style:style>
    <style:style style:name="P4" style:family="paragraph" style:parent-style-name="Text_20_body" style:list-style-name="L2">
      <style:text-properties officeooo:rsid="000edeb4" officeooo:paragraph-rsid="000edeb4"/>
    </style:style>
    <style:style style:name="P5" style:family="paragraph" style:parent-style-name="Text_20_body">
      <style:text-properties officeooo:rsid="000edeb4" officeooo:paragraph-rsid="000edeb4"/>
    </style:style>
    <style:style style:name="P6" style:family="paragraph" style:parent-style-name="Text_20_body">
      <style:text-properties officeooo:paragraph-rsid="000ff5d0"/>
    </style:style>
    <style:style style:name="P7" style:family="paragraph" style:parent-style-name="Text_20_body" style:list-style-name="L3">
      <style:text-properties officeooo:rsid="00115b23" officeooo:paragraph-rsid="00115b23"/>
    </style:style>
    <style:style style:name="P8" style:family="paragraph" style:parent-style-name="Text_20_body" style:list-style-name="L3">
      <style:text-properties officeooo:rsid="0016f6b8" officeooo:paragraph-rsid="0016f6b8"/>
    </style:style>
    <style:style style:name="P9" style:family="paragraph" style:parent-style-name="Text_20_body" style:list-style-name="L3">
      <style:text-properties officeooo:rsid="0012495a" officeooo:paragraph-rsid="0012495a"/>
    </style:style>
    <style:style style:name="P10" style:family="paragraph" style:parent-style-name="Text_20_body">
      <style:text-properties officeooo:rsid="00115b23" officeooo:paragraph-rsid="00115b23"/>
    </style:style>
    <style:style style:name="P11" style:family="paragraph" style:parent-style-name="Text_20_body" style:list-style-name="L4">
      <style:text-properties officeooo:rsid="0013a998" officeooo:paragraph-rsid="0013a998"/>
    </style:style>
    <style:style style:name="P12" style:family="paragraph" style:parent-style-name="Text_20_body" style:list-style-name="L4">
      <style:text-properties officeooo:rsid="001a21df" officeooo:paragraph-rsid="001a21df"/>
    </style:style>
    <style:style style:name="P13" style:family="paragraph" style:parent-style-name="Text_20_body" style:list-style-name="L4">
      <style:text-properties officeooo:rsid="001afcd1" officeooo:paragraph-rsid="001afcd1"/>
    </style:style>
    <style:style style:name="P14" style:family="paragraph" style:parent-style-name="Text_20_body" style:list-style-name="L4">
      <style:text-properties officeooo:rsid="0025edca" officeooo:paragraph-rsid="0025edca"/>
    </style:style>
    <style:style style:name="P15" style:family="paragraph" style:parent-style-name="Table_20_Contents">
      <style:text-properties officeooo:paragraph-rsid="001daeac"/>
    </style:style>
    <style:style style:name="P16" style:family="paragraph" style:parent-style-name="Text_20_body" style:list-style-name="L5">
      <style:text-properties officeooo:rsid="001daeac" officeooo:paragraph-rsid="001daeac"/>
    </style:style>
    <style:style style:name="P17" style:family="paragraph" style:parent-style-name="Text_20_body">
      <style:text-properties officeooo:rsid="001daeac" officeooo:paragraph-rsid="001daeac"/>
    </style:style>
    <style:style style:name="P18" style:family="paragraph" style:parent-style-name="Table_20_Contents">
      <style:text-properties officeooo:paragraph-rsid="001e633e"/>
    </style:style>
    <style:style style:name="P19" style:family="paragraph" style:parent-style-name="Text_20_body" style:list-style-name="L6">
      <style:text-properties officeooo:rsid="001e633e" officeooo:paragraph-rsid="001e633e"/>
    </style:style>
    <style:style style:name="P20" style:family="paragraph" style:parent-style-name="Text_20_body">
      <style:text-properties officeooo:rsid="001e633e" officeooo:paragraph-rsid="001e633e"/>
    </style:style>
    <style:style style:name="P21" style:family="paragraph" style:parent-style-name="Table_20_Contents">
      <style:text-properties officeooo:paragraph-rsid="001ebcdf"/>
    </style:style>
    <style:style style:name="P22" style:family="paragraph" style:parent-style-name="Text_20_body" style:list-style-name="L7">
      <style:text-properties officeooo:rsid="0021e7a8" officeooo:paragraph-rsid="0021e7a8"/>
    </style:style>
    <style:style style:name="P23" style:family="paragraph" style:parent-style-name="Text_20_body">
      <style:text-properties officeooo:rsid="0021e7a8" officeooo:paragraph-rsid="0021e7a8"/>
    </style:style>
    <style:style style:name="P24" style:family="paragraph" style:parent-style-name="Text_20_body" style:list-style-name="L8">
      <style:text-properties officeooo:rsid="00289c73" officeooo:paragraph-rsid="00289c73"/>
    </style:style>
    <style:style style:name="P25" style:family="paragraph" style:parent-style-name="Text_20_body" style:list-style-name="L8">
      <style:text-properties officeooo:rsid="002a94fa" officeooo:paragraph-rsid="002a94fa"/>
    </style:style>
    <style:style style:name="P26" style:family="paragraph" style:parent-style-name="Text_20_body">
      <style:text-properties officeooo:rsid="002a94fa" officeooo:paragraph-rsid="002a94fa"/>
    </style:style>
    <style:style style:name="P27" style:family="paragraph" style:parent-style-name="Table_20_Contents">
      <style:text-properties officeooo:paragraph-rsid="002bc30d"/>
    </style:style>
    <style:style style:name="P28" style:family="paragraph" style:parent-style-name="Table_20_Contents">
      <style:text-properties officeooo:paragraph-rsid="002c9dd8"/>
    </style:style>
    <style:style style:name="P29" style:family="paragraph" style:parent-style-name="Text_20_body" style:list-style-name="L9">
      <style:text-properties officeooo:rsid="002dcd2f" officeooo:paragraph-rsid="002dcd2f"/>
    </style:style>
    <style:style style:name="P30" style:family="paragraph" style:parent-style-name="Text_20_body">
      <style:text-properties officeooo:rsid="002dcd2f" officeooo:paragraph-rsid="002dcd2f"/>
    </style:style>
    <style:style style:name="P31" style:family="paragraph" style:parent-style-name="Table_20_Contents">
      <style:text-properties officeooo:paragraph-rsid="002f40ac"/>
    </style:style>
    <style:style style:name="P32" style:family="paragraph" style:parent-style-name="Table_20_Contents">
      <style:text-properties officeooo:paragraph-rsid="00303370"/>
    </style:style>
    <style:style style:name="T1" style:family="text">
      <style:text-properties fo:background-color="#ffdbb6" loext:char-shading-value="0"/>
    </style:style>
    <style:style style:name="T2" style:family="text">
      <style:text-properties style:text-position="super 58%"/>
    </style:style>
    <style:style style:name="T3" style:family="text">
      <style:text-properties style:text-position="33% 80%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c4d13"/>
    </style:style>
    <style:style style:name="T6" style:family="text">
      <style:text-properties style:text-position="super 58%" officeooo:rsid="001c4d13"/>
    </style:style>
    <style:style style:name="T7" style:family="text">
      <style:text-properties officeooo:rsid="0018926c"/>
    </style:style>
    <style:style style:name="T8" style:family="text">
      <style:text-properties fo:font-style="italic" fo:background-color="#ffdbb6" loext:char-shading-value="0"/>
    </style:style>
    <style:style style:name="T9" style:family="text">
      <style:text-properties officeooo:rsid="00158913"/>
    </style:style>
    <style:style style:name="T10" style:family="text">
      <style:text-properties style:text-position="super 58%" officeooo:rsid="00158913"/>
    </style:style>
    <style:style style:name="T11" style:family="text">
      <style:text-properties officeooo:rsid="0026a9da"/>
    </style:style>
    <style:style style:name="T12" style:family="text">
      <style:text-properties fo:font-style="italic"/>
    </style:style>
    <style:style style:name="T13" style:family="text">
      <style:text-properties officeooo:rsid="002a66d5"/>
    </style:style>
    <style:style style:name="T14" style:family="text">
      <style:text-properties officeooo:rsid="003109d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Genesis 7:11</text:p>
            <text:p text:style-name="P1"><text:span text:style-name="T1">In the six hundredth year of Noah's life, in the second month, the seventeenth day of the month</text:span>, the same day were all the fountains of the great deep broken up, and the windows of heaven were opened.</text:p>
          </table:table-cell>
        </table:table-row>
      </table:table>
      <text:list text:style-name="L1">
        <text:list-item>
          <text:p text:style-name="P2">The rain began on the 2<text:span text:style-name="T2">nd</text:span> month, 17<text:span text:style-name="T2">th</text:span> day</text:p>
        </text:list-item>
      </text:list>
      <text:p text:style-name="Text_20_body"/>
      <table:table table:name="Table5" table:style-name="Table5">
        <table:table-column table:style-name="Table5.A"/>
        <table:table-row>
          <table:table-cell table:style-name="Table5.A1" office:value-type="string">
            <text:p text:style-name="P3">Genesis 7:12</text:p>
            <text:p text:style-name="P3">And the rain was upon the earth forty days and forty nights.</text:p>
          </table:table-cell>
        </table:table-row>
      </table:table>
      <text:list text:style-name="L2">
        <text:list-item>
          <text:p text:style-name="P4">It rained for 40 days and 40 nights</text:p>
        </text:list-item>
      </text:list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Genesis 7:24</text:p>
            <text:p text:style-name="P1">And the waters prevailed upon the earth an hundred and fifty days.</text:p>
          </table:table-cell>
        </table:table-row>
      </table:table>
      <text:p text:style-name="P6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Genesis 8:3-4<text:line-break/><text:span text:style-name="T3">3</text:span> And the waters returned from off the earth continually: and <text:span text:style-name="T1">after the end of the hundred and fifty days</text:span> the waters were abated. <text:line-break/><text:span text:style-name="T3">4</text:span> And the ark rested in the <text:span text:style-name="T1">seventh month, on the seventeenth day of the month</text:span>, upon the mountains of Ararat.</text:p>
          </table:table-cell>
        </table:table-row>
      </table:table>
      <text:list text:style-name="L3">
        <text:list-item>
          <text:p text:style-name="P7"><text:span text:style-name="T4">After the end</text:span> of 150 days the waters began do decrease (<text:span text:style-name="T5">the end of the 150</text:span><text:span text:style-name="T6">th</text:span><text:span text:style-name="T5"> day is the 151</text:span><text:span text:style-name="T6">st</text:span><text:span text:style-name="T5"> day</text:span>).</text:p>
        </text:list-item>
        <text:list-item>
          <text:p text:style-name="P8">Notice that we aren’t told that verse 4 happened on the same day as verse 3.</text:p>
          <text:list>
            <text:list-item>
              <text:p text:style-name="P9"><text:span text:style-name="T7">Therefore, a</text:span>fter an unknown amount of time the ark rested upon the mountains or Ararat.</text:p>
            </text:list-item>
          </text:list>
        </text:list-item>
      </text:list>
      <text:p text:style-name="P10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Genesis 8:5-6<text:line-break/><text:span text:style-name="T3">5</text:span> And the waters <text:span text:style-name="T1">decreased continually until the tenth month</text:span>: in the <text:span text:style-name="T1">tenth </text:span><text:span text:style-name="T8">month</text:span><text:span text:style-name="T1">, on the first </text:span><text:span text:style-name="T8">day</text:span><text:span text:style-name="T1"> of the month</text:span>, were the tops of the mountains seen. <text:line-break/><text:span text:style-name="T3">6</text:span> And it came to pass <text:span text:style-name="T1">at the end of forty days</text:span>, that Noah opened the window of the ark which he had made:</text:p>
          </table:table-cell>
        </table:table-row>
      </table:table>
      <text:list text:style-name="L4">
        <text:list-item>
          <text:p text:style-name="P11">The waters continued to decrease until the 10<text:span text:style-name="T2">th</text:span> month. <text:span text:style-name="T9">On the 1</text:span><text:span text:style-name="T10">st</text:span><text:span text:style-name="T9"> day of the 10</text:span><text:span text:style-name="T10">th</text:span><text:span text:style-name="T9"> month the tops of the mountains could be seen.</text:span></text:p>
        </text:list-item>
        <text:list-item>
          <text:p text:style-name="P12">Consistent with Gen 8:3,4, how could the ark rest on the mountains of Ararat if the tops of the mountains couldn’t be seen until the 10<text:span text:style-name="T2">th</text:span> month?</text:p>
          <text:list>
            <text:list-item>
              <text:p text:style-name="P13">The ark must have been still floating on the water but it rested (stopped moving) above the mountains of Ararat.</text:p>
            </text:list-item>
          </text:list>
        </text:list-item>
        <text:list-item>
          <text:p text:style-name="P14">At the end of 40 days (the 41<text:span text:style-name="T2">st</text:span> day) Noah opened the <text:span text:style-name="T11">(singular) </text:span>window of the ark</text:p>
        </text:list-item>
      </text:list>
      <text:p text:style-name="Text_20_body"/>
      <table:table table:name="Table6" table:style-name="Table6">
        <table:table-column table:style-name="Table6.A"/>
        <table:table-row>
          <table:table-cell table:style-name="Table6.A1" office:value-type="string">
            <text:p text:style-name="P15">Genesis 8:6</text:p>
            <text:p text:style-name="P15">And it came to pass at the end of forty days, that Noah opened the window of the ark which he had made:</text:p>
          </table:table-cell>
        </table:table-row>
      </table:table>
      <text:list text:style-name="L5">
        <text:list-item>
          <text:p text:style-name="P16">At the end of 40 days (which is the same as the 41<text:span text:style-name="T2">st</text:span> day)</text:p>
        </text:list-item>
      </text:list>
      <text:p text:style-name="P17"/>
      <table:table table:name="Table7" table:style-name="Table7">
        <table:table-column table:style-name="Table7.A"/>
        <table:table-row>
          <table:table-cell table:style-name="Table7.A1" office:value-type="string">
            <text:p text:style-name="P18">Genesis 8:10</text:p>
            <text:p text:style-name="P18">And he stayed yet other seven days; and again he sent forth the dove out of the ark;</text:p>
          </table:table-cell>
        </table:table-row>
      </table:table>
      <text:list text:style-name="L6">
        <text:list-item>
          <text:p text:style-name="P19">After 7 more (full) days, Noah sends the dove out again</text:p>
        </text:list-item>
      </text:list>
      <text:p text:style-name="P20"/>
      <table:table table:name="Table8" table:style-name="Table8">
        <table:table-column table:style-name="Table8.A"/>
        <table:table-row>
          <table:table-cell table:style-name="Table8.A1" office:value-type="string">
            <text:p text:style-name="P21">Genesis 8:13-14<text:line-break/><text:span text:style-name="T3">13</text:span> And it came to pass in the <text:span text:style-name="T1">six hundredth and first year, in the first </text:span><text:span text:style-name="T8">month</text:span><text:span text:style-name="T1">, the first </text:span><text:span text:style-name="T8">day</text:span><text:span text:style-name="T1"> of the month</text:span>, the waters were dried up from off the earth: and Noah removed the covering of the ark, and looked, and, behold, the face of the ground was dry. <text:line-break/><text:span text:style-name="T3">14</text:span> And in the <text:span text:style-name="T1">second month, on the seven and twentieth day of the month</text:span>, was the earth dried.</text:p>
          </table:table-cell>
        </table:table-row>
      </table:table>
      <text:list text:style-name="L7">
        <text:list-item>
          <text:p text:style-name="P22">In the 601<text:span text:style-name="T2">st</text:span> year of Noahs life, 1<text:span text:style-name="T2">st</text:span> month, 1<text:span text:style-name="T2">st</text:span> day Noah removed the covering of the Ark and had a look around.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able:table table:name="Table9" table:style-name="Table9">
        <table:table-column table:style-name="Table9.A"/>
        <text:soft-page-break/>
        <table:table-row>
          <table:table-cell table:style-name="Table9.A1" office:value-type="string">
            <text:p text:style-name="Table_20_Contents">Revelation 11:2-3<text:line-break/><text:span text:style-name="T3">2</text:span> But the court which is without the temple leave out, and measure it not; for it is given unto the Gentiles: and the holy city shall they tread under foot <text:span text:style-name="T1">forty </text:span><text:span text:style-name="T8">and</text:span><text:span text:style-name="T1"> two months</text:span>. <text:line-break/><text:span text:style-name="T3">3</text:span> And I will give <text:span text:style-name="T12">power</text:span> unto my two witnesses, and they shall prophesy a <text:span text:style-name="T1">thousand two hundred </text:span><text:span text:style-name="T8">and</text:span><text:span text:style-name="T1"> threescore days</text:span>, clothed in sackcloth.</text:p>
          </table:table-cell>
        </table:table-row>
      </table:table>
      <text:list text:style-name="L8">
        <text:list-item>
          <text:p text:style-name="P24">1260 divided by 30 just so happens to be exactly 42 months</text:p>
        </text:list-item>
        <text:list-item>
          <text:p text:style-name="P24">Note that we are <text:span text:style-name="T13">not</text:span> told that these two events are equal in length!</text:p>
          <text:list>
            <text:list-item>
              <text:p text:style-name="P24">“shall they tread under foot” is not necessarily equal to “they shall prophesy”</text:p>
              <text:list>
                <text:list-item>
                  <text:p text:style-name="P25">Rev 11:7 is what happens at the end of the 1260 days.</text:p>
                </text:list-item>
              </text:list>
            </text:list-item>
          </text:list>
        </text:list-item>
      </text:list>
      <text:p text:style-name="P26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7">Revelation 12:6</text:p>
            <text:p text:style-name="P27">And the woman fled into the wilderness, where she hath a place prepared of God, that they should feed her there <text:span text:style-name="T1">a thousand two hundred and threescore days</text:span>.</text:p>
          </table:table-cell>
        </table:table-row>
        <table:table-row>
          <table:table-cell table:style-name="Table10.A2" office:value-type="string">
            <text:p text:style-name="P28">Revelation 12:14</text:p>
            <text:p text:style-name="P28">And to the woman were given two wings of a great eagle, that she might fly into the wilderness, into her place, where she is nourished for <text:span text:style-name="T1">a time, and times, and half a time</text:span>, from the face of the serpent.</text:p>
          </table:table-cell>
        </table:table-row>
      </table:table>
      <text:list text:style-name="L9">
        <text:list-item>
          <text:p text:style-name="P29">These appear to be equal time lengths so 1260 days = a time, and times, and half a time</text:p>
        </text:list-item>
      </text:list>
      <text:p text:style-name="P30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1">Psalms 104:19</text:p>
            <text:p text:style-name="P31">He appointed H6213[(H8804)] the moon H3394 for seasons H4150: the sun H8121 knoweth H3045[(H8804)] his going down H3996.</text:p>
          </table:table-cell>
        </table:table-row>
      </table:table>
      <text:p text:style-name="P30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2">Genesis 1:14</text:p>
            <text:p text:style-name="P32">And God said, Let there be <text:span text:style-name="T1">lights</text:span> in the firmament of the heaven to divide the day from the night; and let <text:span text:style-name="T1">them</text:span> be for signs, and for seasons, and for days, and <text:span text:style-name="T1">years</text:span>:</text:p>
          </table:table-cell>
        </table:table-row>
      </table:table>
      <text:p text:style-name="P30"/>
      <text:p text:style-name="P30">“<text:span text:style-name="T14">month” H2320, H3381, H3393, G3376 shows up at “moon” 11 times and “moons” 11 times (22 total out of 309).</text:span></text:p>
      <text:p text:style-name="P30"/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00%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text-align="left" style:justify-single-word="false" fo:orphans="0" fo:widows="0" style:page-number="auto" fo:padding="0.0098in" fo:border="none" style:shadow="none" text:number-lines="false" text:line-number="0"/>
    </style:style>
    <style:style style:name="Table" style:family="paragraph" style:parent-style-name="Caption" style:class="extra">
      <style:paragraph-properties fo:padding="0.0098in" fo:border="0.74pt solid #000000" style:shadow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4T16:58:23.449596400</meta:creation-date>
    <dc:title>default</dc:title>
    <meta:editing-duration>PT1H35M34S</meta:editing-duration>
    <meta:editing-cycles>37</meta:editing-cycles>
    <meta:generator>LibreOffice/26.2.4.2$Linux_X86_64 LibreOffice_project/64a984c51f4702dbd3710b13428c673a2f1292e7</meta:generator>
    <dc:date>2026-07-11T12:31:59.057375352</dc:date>
    <meta:document-statistic meta:table-count="12" meta:image-count="0" meta:object-count="0" meta:page-count="2" meta:paragraph-count="40" meta:word-count="789" meta:character-count="3987" meta:non-whitespace-character-count="3251"/>
    <meta:template xlink:type="simple" xlink:actuate="onRequest" xlink:title="default" xlink:href="../../../../../AppData/Roaming/LibreOffice/4/user/template/default1.ott" meta:date="2025-08-04T16:58:23.046474300"/>
  </office:meta>
</office:document-meta>
</file>