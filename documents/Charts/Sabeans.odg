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7cm" fo:min-width="1.854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1.854cm" loext:decorative="false"/>
      <style:paragraph-properties style:writing-mode="lr-tb"/>
    </style:style>
    <style:style style:name="gr3" style:family="graphic" style:parent-style-name="standard">
      <style:graphic-properties draw:fill="solid" draw:fill-color="#fff5ce" draw:textarea-horizontal-align="justify" draw:textarea-vertical-align="middle" draw:auto-grow-height="false" fo:min-height="1.469cm" fo:min-width="1.855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width="0.106cm" svg:stroke-color="#ff4000" draw:marker-start-width="0.359cm" draw:marker-end="Arrowheads_20_1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fff5c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906cm" svg:x="8.937cm" svg:y="0.364cm">
          <text:p text:style-name="P1">Noa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.54cm" svg:height="1.905cm" svg:x="8.937cm" svg:y="3.105cm">
          <text:p text:style-name="P1">H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54cm" svg:height="1.905cm" svg:x="8.937cm" svg:y="5.862cm">
          <text:p text:style-name="P1">Cu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54cm" svg:height="1.905cm" svg:x="6.397cm" svg:y="9.837cm">
          <text:p text:style-name="P1">Seb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2.54cm" svg:height="1.905cm" svg:x="11.477cm" svg:y="9.837cm">
          <text:p text:style-name="P1">Sheb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2.541cm" svg:height="1.905cm" svg:x="8.936cm" svg:y="13.512cm">
          <text:p text:style-name="P1">Sabea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4" draw:text-style-name="P3" draw:layer="layout" draw:type="lines" svg:x1="10.207cm" svg:y1="2.27cm" svg:x2="10.207cm" svg:y2="3.105cm" draw:start-shape="id1" draw:start-glue-point="2" draw:end-shape="id2" draw:end-glue-point="0" svg:d="M10207 2270v502-169 502" svg:viewBox="0 0 1 836">
          <text:p/>
        </draw:connector>
        <draw:connector draw:style-name="gr4" draw:text-style-name="P3" draw:layer="layout" draw:type="lines" svg:x1="10.207cm" svg:y1="5.01cm" svg:x2="10.207cm" svg:y2="5.862cm" draw:start-shape="id2" draw:start-glue-point="2" draw:end-shape="id3" draw:end-glue-point="0" svg:d="M10207 5010v501-151 502" svg:viewBox="0 0 1 853">
          <text:p/>
        </draw:connector>
        <draw:connector draw:style-name="gr4" draw:text-style-name="P3" draw:layer="layout" draw:type="lines" svg:x1="10.207cm" svg:y1="7.767cm" svg:x2="7.667cm" svg:y2="9.837cm" draw:start-shape="id3" draw:start-glue-point="2" draw:end-shape="id4" draw:end-glue-point="0" svg:d="M10207 7767v501l-2540 1067v502" svg:viewBox="0 0 2541 2071">
          <text:p/>
        </draw:connector>
        <draw:connector draw:style-name="gr4" draw:text-style-name="P3" draw:layer="layout" draw:type="lines" svg:x1="10.207cm" svg:y1="7.767cm" svg:x2="12.747cm" svg:y2="9.837cm" draw:start-shape="id3" draw:start-glue-point="2" draw:end-shape="id5" draw:end-glue-point="0" svg:d="M10207 7767v501l2540 1067v502" svg:viewBox="0 0 2541 2071">
          <text:p/>
        </draw:connector>
        <draw:connector draw:style-name="gr4" draw:text-style-name="P3" draw:layer="layout" draw:type="lines" svg:x1="7.667cm" svg:y1="11.742cm" svg:x2="10.206cm" svg:y2="13.512cm" draw:start-shape="id4" draw:start-glue-point="2" draw:end-shape="id6" draw:end-glue-point="0" svg:d="M7667 11742v501l2539 767v502" svg:viewBox="0 0 2540 1771">
          <text:p/>
        </draw:connector>
        <draw:connector draw:style-name="gr4" draw:text-style-name="P3" draw:layer="layout" draw:type="lines" svg:x1="12.747cm" svg:y1="11.742cm" svg:x2="10.206cm" svg:y2="13.512cm" draw:start-shape="id5" draw:start-glue-point="2" draw:end-shape="id6" draw:end-glue-point="0" svg:d="M12747 11742v501l-2541 767v502" svg:viewBox="0 0 2542 17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9T16:11:18.656171700</meta:creation-date>
    <dc:date>2025-06-29T16:23:42.448785500</dc:date>
    <meta:editing-duration>PT12M21S</meta:editing-duration>
    <meta:editing-cycles>7</meta:editing-cycles>
    <meta:generator>LibreOffice/25.2.4.3$Windows_X86_64 LibreOffice_project/33e196637044ead23f5c3226cde09b47731f7e27</meta:generator>
    <meta:document-statistic meta:object-count="12"/>
  </office:meta>
</office:document-meta>
</file>