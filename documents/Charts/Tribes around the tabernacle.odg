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40000029427E197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 style:list-style-name="L1">
      <style:graphic-properties draw:stroke="dash" draw:stroke-dash="Dash" svg:stroke-width="0cm" svg:stroke-color="#000000" draw:marker-start-width="0.203cm" draw:marker-end-width="0.203cm" svg:stroke-opacity="100%" draw:stroke-linejoin="round" svg:stroke-linecap="butt" draw:fill="none" draw:fill-color="#729fcf" draw:textarea-vertical-align="middle" draw:auto-grow-height="false" fo:min-height="7.186cm" fo:min-width="6.936cm" fo:padding-top="0.051cm" fo:padding-bottom="0.051cm" fo:padding-left="0.076cm" fo:padding-right="0.076cm" loext:decorative="false"/>
      <style:paragraph-properties style:writing-mode="lr-tb"/>
    </style:style>
    <style:style style:name="gr2" style:family="graphic" style:parent-style-name="standard">
      <style:graphic-properties draw:stroke="none" svg:stroke-opacity="100%" draw:fill="solid" draw:fill-color="#ffffff" draw:textarea-horizontal-align="justify" draw:textarea-vertical-align="middle" draw:auto-grow-height="false" fo:min-height="0.216cm" fo:min-width="1.118cm" draw:shadow-offset-x="0.203cm" draw:shadow-offset-y="0.203cm" loext:decorative="false"/>
    </style:style>
    <style:style style:name="gr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4.513cm" fo:min-width="2.675cm" loext:decorative="fals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02cm" fo:min-width="0.77cm" loext:decorative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068cm" fo:min-width="0cm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08cm" fo:min-width="0cm" loext:decorative="false"/>
    </style:style>
    <style:style style:name="gr8" style:family="graphic" style:parent-style-name="objectwithoutfill">
      <style:graphic-properties svg:stroke-color="#000000" draw:fill="none" draw:textarea-vertical-align="middle" loext:decorative="false"/>
    </style:style>
    <style:style style:name="gr9" style:family="graphic" style:parent-style-name="standard">
      <style:graphic-properties draw:stroke="none" draw:stroke-dash="Long_20_Dash_20__28_Rounded_29_" svg:stroke-color="#000000" svg:stroke-opacity="50%" svg:stroke-linecap="round" draw:fill="none" draw:fill-color="#ffffff" fo:min-height="1.423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stroke-dash="Dot" svg:stroke-color="#000000" svg:stroke-linecap="butt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fo:min-height="2.371cm" draw:shadow="hidden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655cm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draw:stroke="dash" draw:stroke-dash="Long_20_Dash_20__28_Rounded_29_" svg:stroke-color="#000000" svg:stroke-opacity="100%" svg:stroke-linecap="round" draw:fill="none" draw:fill-color="#ffffff" fo:min-height="5.68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845cm" loext:decorative="false"/>
      <style:paragraph-properties style:writing-mode="lr-tb"/>
    </style:style>
    <style:style style:name="gr16" style:family="graphic" style:parent-style-name="standard">
      <style:graphic-properties draw:stroke="dash" draw:stroke-dash="Long_20_Dash_20__28_Rounded_29_" svg:stroke-color="#000000" svg:stroke-opacity="100%" svg:stroke-linecap="round" draw:fill="none" draw:fill-color="#ffffff" fo:min-height="6.16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79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4.741cm" loext:decorative="false"/>
      <style:paragraph-properties style:writing-mode="lr-tb"/>
    </style:style>
    <style:style style:name="gr19" style:family="graphic" style:parent-style-name="standard">
      <style:graphic-properties draw:stroke="dash" draw:stroke-dash="Dash" svg:stroke-color="#000000" svg:stroke-opacity="100%" svg:stroke-linecap="butt" draw:fill="none" draw:textarea-horizontal-align="justify" draw:textarea-vertical-align="middle" draw:auto-grow-height="false" fo:min-height="7.186cm" fo:min-width="6.936cm" fo:wrap-option="wrap" loext:decorativ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text-align="center" fo:text-indent="0cm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109cm" svg:height="0.629cm" svg:x="10.241cm" svg:y="8.741cm">
          <draw:text-box>
            <text:p text:style-name="P1"><text:span text:style-name="T1">Levi</text:span></text:p>
          </draw:text-box>
        </draw:frame>
        <draw:custom-shape draw:style-name="gr2" draw:text-style-name="P3" draw:layer="layout" svg:width="1.27cm" svg:height="0.318cm" svg:x="10.16cm" svg:y="8.429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4" draw:layer="layout" svg:width="3.175cm" svg:height="4.763cm" draw:transform="rotate (1.5707963267949) translate (8.414cm 15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27cm" svg:height="1.852cm" draw:transform="rotate (1.5707963267949) translate (8.728cm 14.7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318cm" svg:height="0.318cm" draw:transform="rotate (1.5707963267949) translate (12.219cm 14.2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18cm" svg:height="0.317cm" draw:transform="rotate (1.5707963267949) translate (11.269cm 14.2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52cm" svg:height="0.33cm" draw:transform="rotate (1.5707963267949) translate (9.985cm 13.6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152cm" svg:height="0.33cm" draw:transform="rotate (1.5707963267949) translate (9.987cm 14.7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102cm" svg:height="0.102cm" draw:transform="rotate (1.5707963267949) translate (10.102cm 14.7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001cm" svg:height="0.203cm" draw:transform="rotate (1.5707963267949) translate (10.052cm 14.7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102cm" svg:height="0.102cm" draw:transform="rotate (1.5707963267949) translate (10.15cm 13.5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02cm" svg:height="0.102cm" draw:transform="rotate (1.5707963267949) translate (10.052cm 13.5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6" draw:layer="layout" svg:width="0.31cm" svg:height="0.704cm" draw:transform="skewX (-0.814719694830953) rotate (2.21115762935162) translate (9.44323946829033cm 14.7659866224233cm)" svg:viewBox="0 0 311 705" svg:d="M0 0c38-2 74 31 111 24 64-11 23 77 8 110-17 40-66 75-39 120 19 33 59 21 88 12 54-17 41 62 10 85-17 12-86 87-25 103 35 9 87-29 106 15 25 58-33 121-67 163-53 66 48 82 59 61l29 1 31 11">
          <text:p/>
        </draw:path>
        <draw:custom-shape draw:style-name="gr6" draw:text-style-name="P5" draw:layer="layout" svg:width="0.152cm" svg:height="0.152cm" draw:transform="rotate (1.5707963267949) translate (9.516cm 14.2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54cm" svg:height="0.102cm" draw:transform="rotate (1.5707963267949) translate (8.932cm 14.258cm)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932cm" svg:y1="14.347cm" svg:x2="8.932cm" svg:y2="13.915cm">
          <text:p/>
        </draw:line>
        <draw:line draw:style-name="gr8" draw:text-style-name="P6" draw:layer="layout" svg:x1="9.034cm" svg:y1="14.347cm" svg:x2="9.034cm" svg:y2="13.915cm">
          <text:p/>
        </draw:line>
        <draw:frame draw:style-name="gr9" draw:text-style-name="P8" draw:layer="layout" svg:width="2.61cm" svg:height="1.525cm" svg:x="5.715cm" svg:y="13.208cm">
          <draw:text-box>
            <text:p text:style-name="P7"><text:span text:style-name="T2"><text:s/>Gershonites</text:span></text:p>
            <text:p text:style-name="P7"><text:span text:style-name="T2">7,500</text:span></text:p>
            <text:p text:style-name="P7"><text:span text:style-name="T2">(3:22)</text:span></text:p>
          </draw:text-box>
        </draw:frame>
        <draw:frame draw:style-name="gr10" draw:text-style-name="P6" draw:layer="layout" svg:width="6.033cm" svg:height="6.033cm" svg:x="14.922cm" svg:y="0.635cm">
          <draw:image xlink:href="Pictures/10000001000002940000029427E19754.png" xlink:type="simple" xlink:show="embed" xlink:actuate="onLoad" draw:mime-type="image/png">
            <text:p/>
          </draw:image>
        </draw:frame>
        <draw:frame draw:style-name="gr11" draw:text-style-name="P8" draw:layer="layout" svg:width="2.222cm" svg:height="2.473cm" svg:x="13.371cm" svg:y="12.91cm">
          <draw:text-box>
            <text:p text:style-name="P7"><text:span text:style-name="T2">Moses, Aaron &amp; his sons</text:span></text:p>
            <text:p text:style-name="P7"><text:span text:style-name="T2">300</text:span><text:span text:style-name="T3">†</text:span></text:p>
            <text:p text:style-name="P7"><text:span text:style-name="T4">(3:38)</text:span></text:p>
          </draw:text-box>
        </draw:frame>
        <draw:frame draw:style-name="gr12" draw:text-style-name="P8" draw:layer="layout" svg:width="2.857cm" svg:height="1.757cm" svg:x="9.367cm" svg:y="10.025cm">
          <draw:text-box>
            <text:p text:style-name="P7"><text:span text:style-name="T2">Merarites</text:span></text:p>
            <text:p text:style-name="P7"><text:span text:style-name="T2">6,200</text:span></text:p>
            <text:p text:style-name="P7"><text:span text:style-name="T2">(3:34)</text:span></text:p>
          </draw:text-box>
        </draw:frame>
        <draw:frame draw:style-name="gr12" draw:text-style-name="P8" draw:layer="layout" svg:width="2.857cm" svg:height="1.757cm" svg:x="9.367cm" svg:y="16.34cm">
          <draw:text-box>
            <text:p text:style-name="P7"><text:span text:style-name="T2">Kohathites</text:span></text:p>
            <text:p text:style-name="P7"><text:span text:style-name="T2">8,600 (8,300)</text:span><text:span text:style-name="T3">†</text:span></text:p>
            <text:p text:style-name="P7"><text:span text:style-name="T2">(3:28)</text:span></text:p>
          </draw:text-box>
        </draw:frame>
        <draw:custom-shape draw:style-name="gr13" draw:text-style-name="P3" draw:layer="layout" svg:width="0.406cm" svg:height="0.102cm" draw:transform="rotate (1.5707963267949) translate (10.535cm 14.3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3" draw:layer="layout" svg:width="0.406cm" svg:height="0.102cm" draw:transform="rotate (1.5707963267949) translate (13.123cm 14.33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4" draw:text-style-name="P8" draw:layer="layout" svg:width="4.763cm" svg:height="5.791cm" svg:x="16.192cm" svg:y="11.075cm">
          <draw:text-box>
            <text:p text:style-name="P7"><text:span text:style-name="T5">Camp of Judah</text:span></text:p>
            <text:p text:style-name="P7"><text:span text:style-name="T2">186,400</text:span></text:p>
            <text:p text:style-name="P7"><text:span text:style-name="T2">(2:9)</text:span></text:p>
            <text:p text:style-name="P7"><text:span text:style-name="T2"/></text:p>
            <text:p text:style-name="P7"><text:span text:style-name="T2">Judah - 74,600</text:span></text:p>
            <text:p text:style-name="P7"><text:span text:style-name="T2">(2:3,4)</text:span></text:p>
            <text:p text:style-name="P7"><text:span text:style-name="T2"/></text:p>
            <text:p text:style-name="P7"><text:span text:style-name="T2">Issachar - 54,400</text:span></text:p>
            <text:p text:style-name="P7"><text:span text:style-name="T2">(2:5,6)</text:span></text:p>
            <text:p text:style-name="P7"><text:span text:style-name="T2"/></text:p>
            <text:p text:style-name="P7"><text:span text:style-name="T2">Zebulun - 57,400</text:span></text:p>
            <text:p text:style-name="P7"><text:span text:style-name="T2">(2:7,8)</text:span></text:p>
          </draw:text-box>
        </draw:frame>
        <draw:frame draw:style-name="gr15" draw:text-style-name="P10" draw:layer="layout" svg:width="5.715cm" svg:height="2.947cm" svg:x="0.635cm" svg:y="0.635cm">
          <draw:text-box>
            <text:p><text:span text:style-name="T2">Chapter:verse references are from the book of Numbers unless explicitly noted.</text:span></text:p>
            <text:p><text:span text:style-name="T2"/></text:p>
            <text:p text:style-name="P9"><text:span text:style-name="T2">Orientation:</text:span></text:p>
            <text:p text:style-name="P9"><text:span text:style-name="T2"><text:s/>Exodus 27:9-18, Numbers 2</text:span></text:p>
          </draw:text-box>
        </draw:frame>
        <draw:frame draw:style-name="gr14" draw:text-style-name="P8" draw:layer="layout" svg:width="4.286cm" svg:height="5.791cm" svg:x="8.652cm" svg:y="19.367cm">
          <draw:text-box>
            <text:p text:style-name="P7"><text:span text:style-name="T6">Camp of Reuben</text:span></text:p>
            <text:p text:style-name="P7"><text:span text:style-name="T2">151,450</text:span></text:p>
            <text:p text:style-name="P7"><text:span text:style-name="T2">(2:16)</text:span></text:p>
            <text:p text:style-name="P7"><text:span text:style-name="T2"/></text:p>
            <text:p text:style-name="P7"><text:span text:style-name="T2">Reuben - 46,500</text:span></text:p>
            <text:p text:style-name="P7"><text:span text:style-name="T2">(2:10,11)</text:span></text:p>
            <text:p text:style-name="P7"><text:span text:style-name="T2"/></text:p>
            <text:p text:style-name="P7"><text:span text:style-name="T2">Simeon - 59,300</text:span></text:p>
            <text:p text:style-name="P7"><text:span text:style-name="T2">(2:12,13)</text:span></text:p>
            <text:p text:style-name="P7"><text:span text:style-name="T2"/></text:p>
            <text:p text:style-name="P7"><text:span text:style-name="T2">Gad - 45,650</text:span></text:p>
            <text:p text:style-name="P7"><text:span text:style-name="T2">(2:14,15)</text:span></text:p>
          </draw:text-box>
        </draw:frame>
        <draw:frame draw:style-name="gr16" draw:text-style-name="P8" draw:layer="layout" svg:width="4.365cm" svg:height="6.265cm" svg:x="8.613cm" svg:y="2.307cm">
          <draw:text-box>
            <text:p text:style-name="P7"><text:span text:style-name="T5">Camp of Dan</text:span></text:p>
            <text:p text:style-name="P7"><text:span text:style-name="T2">157,600</text:span></text:p>
            <text:p text:style-name="P7"><text:span text:style-name="T2">(2:31)</text:span></text:p>
            <text:p text:style-name="P7"><text:span text:style-name="T2"/></text:p>
            <text:p text:style-name="P7"><text:span text:style-name="T2">Dan - 62,700</text:span></text:p>
            <text:p text:style-name="P7"><text:span text:style-name="T2">(2:25,26)</text:span></text:p>
            <text:p text:style-name="P7"><text:span text:style-name="T2"/></text:p>
            <text:p text:style-name="P7"><text:span text:style-name="T2">Asher - 41,500</text:span></text:p>
            <text:p text:style-name="P7"><text:span text:style-name="T2">(2:27,28)</text:span></text:p>
            <text:p text:style-name="P7"><text:span text:style-name="T2"/></text:p>
            <text:p text:style-name="P7"><text:span text:style-name="T2">Naphtali - 53,400</text:span></text:p>
            <text:p text:style-name="P7"><text:span text:style-name="T2">(2:29,30)</text:span></text:p>
          </draw:text-box>
        </draw:frame>
        <draw:frame draw:style-name="gr14" draw:text-style-name="P8" draw:layer="layout" svg:width="4.762cm" svg:height="5.791cm" svg:x="0.635cm" svg:y="11.075cm">
          <draw:text-box>
            <text:p text:style-name="P7"><text:span text:style-name="T6">Camp of Ephraim</text:span></text:p>
            <text:p text:style-name="P7"><text:span text:style-name="T2">108,100</text:span></text:p>
            <text:p text:style-name="P7"><text:span text:style-name="T2">(2:24)</text:span></text:p>
            <text:p text:style-name="P7"><text:span text:style-name="T2"/></text:p>
            <text:p text:style-name="P7"><text:span text:style-name="T2">Ephraim - 40,500</text:span></text:p>
            <text:p text:style-name="P7"><text:span text:style-name="T2">(2:18,19)</text:span></text:p>
            <text:p text:style-name="P7"><text:span text:style-name="T2"/></text:p>
            <text:p text:style-name="P7"><text:span text:style-name="T2">Manasseh - 32,200</text:span></text:p>
            <text:p text:style-name="P7"><text:span text:style-name="T2">(2:20,21)</text:span></text:p>
            <text:p text:style-name="P7"><text:span text:style-name="T2"/></text:p>
            <text:p text:style-name="P7"><text:span text:style-name="T2">Benjamin - 35,400</text:span></text:p>
            <text:p text:style-name="P7"><text:span text:style-name="T2">(2:22,23)</text:span></text:p>
          </draw:text-box>
        </draw:frame>
        <draw:frame draw:style-name="gr17" draw:text-style-name="P10" draw:layer="layout" svg:width="5.973cm" svg:height="3.895cm" svg:x="14.982cm" svg:y="23.41cm">
          <draw:text-box>
            <text:p><text:span text:style-name="T3">†</text:span><text:span text:style-name="T2">Moses, Aaron &amp; his sons count can be obtained by subtracting the total in 3:39 (22,000) from the sum of Gershonites, Kohathites, and Merari (22,300). Moses &amp; Aaron are Kohathites (Exodus 6:16-20, Numbers 26:58,59).</text:span></text:p>
          </draw:text-box>
        </draw:frame>
        <draw:frame draw:style-name="gr18" draw:text-style-name="P10" draw:layer="layout" svg:width="5.715cm" svg:height="4.843cm" svg:x="0.635cm" svg:y="22.462cm">
          <draw:text-box>
            <text:p><text:span text:style-name="T2">Camps of Judah, Reuben, Ephraim, &amp; Dan: males 20+ able to go to war - 603,550 (1:2,3,45,46, 2:32)</text:span></text:p>
            <text:p><text:span text:style-name="T2"/></text:p>
            <text:p text:style-name="P9"><text:span text:style-name="T2">Children of Levi families: every male one month and upward (3:15)</text:span></text:p>
            <text:p text:style-name="P9"><text:span text:style-name="T2"/></text:p>
            <text:p text:style-name="P9"><text:span text:style-name="T2">Levi family names: 26:57</text:span></text:p>
          </draw:text-box>
        </draw:frame>
        <draw:custom-shape draw:style-name="gr19" draw:text-style-name="P6" draw:layer="layout" svg:width="10.516cm" svg:height="10.516cm" svg:x="5.537cm" svg:y="8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51cm" fo:padding-bottom="0.051cm" fo:padding-left="0.076cm" fo:padding-right="0.076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Dot_20_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31T09:04:55.545901204</meta:creation-date>
    <dc:date>2026-07-11T12:31:59.599450654</dc:date>
    <meta:editing-duration>PT7H47M58S</meta:editing-duration>
    <meta:editing-cycles>156</meta:editing-cycles>
    <meta:generator>LibreOffice/26.2.4.2$Linux_X86_64 LibreOffice_project/64a984c51f4702dbd3710b13428c673a2f1292e7</meta:generator>
    <meta:print-date>2024-09-04T14:44:41.906000000</meta:print-date>
    <meta:printed-by>PDF files</meta:printed-by>
    <dc:title>Tribes around the tabernacle</dc:title>
    <meta:document-statistic meta:object-count="32"/>
  </office:meta>
</office:document-meta>
</file>