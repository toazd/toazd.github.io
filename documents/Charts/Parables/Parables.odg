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9.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dddddd"/>
    </style:style>
    <style:style style:name="gr1" style:family="graphic">
      <style:graphic-properties style:writing-mode="lr-tb" loext:decorative="false"/>
    </style:style>
    <style:style style:name="gr2" style:family="graphic" style:parent-style-name="standard">
      <style:graphic-properties draw:fill="none" loext:fill-use-slide-background="false" draw:textarea-horizontal-align="justify" draw:textarea-vertical-align="middle" draw:auto-grow-height="false" fo:min-height="20.705cm" fo:min-width="36.33cm" loext:decorative="false"/>
    </style:style>
    <style:style style:name="gr3" style:family="graphic" style:parent-style-name="standard">
      <style:graphic-properties loext:decorative="false"/>
    </style:style>
    <style:style style:name="gr4" style:family="graphic" style:parent-style-name="standard">
      <style:graphic-properties draw:fill="none" loext:fill-use-slide-background="false" draw:textarea-horizontal-align="left" draw:textarea-vertical-align="middle" draw:auto-grow-height="false" fo:min-height="4.316cm" fo:min-width="10.754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left" draw:textarea-vertical-align="middle" draw:auto-grow-height="false" fo:min-height="3.112cm" fo:min-width="9.943cm" style:writing-mode="lr-tb" loext:decorative="false"/>
      <style:paragraph-properties style:writing-mode="lr-tb"/>
    </style:style>
    <style:style style:name="gr6" style:family="graphic" style:parent-style-name="standard">
      <style:graphic-properties draw:fill="none" loext:fill-use-slide-background="false" draw:textarea-horizontal-align="left" draw:textarea-vertical-align="middle" draw:auto-grow-height="false" fo:min-height="2.902cm" fo:min-width="10.908cm" style:writing-mode="lr-tb" loext:decorative="false"/>
      <style:paragraph-properties style:writing-mode="lr-tb"/>
    </style:style>
    <style:style style:name="gr7" style:family="graphic" style:parent-style-name="standard">
      <style:graphic-properties draw:fill="none" loext:fill-use-slide-background="false" draw:textarea-horizontal-align="left" draw:textarea-vertical-align="middle" draw:auto-grow-height="false" fo:min-height="2.659cm" fo:min-width="10.934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justify" draw:textarea-vertical-align="middle" draw:auto-grow-height="false" fo:min-height="5.768cm" fo:min-width="11.233cm" style:writing-mode="lr-tb" loext:decorative="false"/>
      <style:paragraph-properties style:writing-mode="lr-tb"/>
    </style:style>
    <style:style style:name="gr9" style:family="graphic" style:parent-style-name="standard">
      <style:graphic-properties draw:fill="none" loext:fill-use-slide-background="false" draw:textarea-horizontal-align="left" draw:textarea-vertical-align="middle" draw:auto-grow-height="false" fo:min-height="2.615cm" fo:min-width="10.938cm" style:writing-mode="lr-tb" loext:decorative="false"/>
      <style:paragraph-properties style:writing-mode="lr-tb"/>
    </style:style>
    <style:style style:name="gr10" style:family="graphic" style:parent-style-name="standard">
      <style:graphic-properties draw:fill="none" loext:fill-use-slide-background="false" draw:textarea-horizontal-align="justify" draw:textarea-vertical-align="middle" draw:auto-grow-height="false" fo:min-height="4.907cm" fo:min-width="10.69cm" style:writing-mode="lr-tb" loext:decorative="false"/>
      <style:paragraph-properties style:writing-mode="lr-tb"/>
    </style:style>
    <style:style style:name="gr11" style:family="graphic" style:parent-style-name="standard">
      <style:graphic-properties draw:fill="none" loext:fill-use-slide-background="false" draw:textarea-horizontal-align="justify" draw:textarea-vertical-align="middle" draw:auto-grow-height="false" fo:min-height="10.669cm" fo:min-width="10.102cm" style:writing-mode="lr-tb" loext:decorative="false"/>
      <style:paragraph-properties style:writing-mode="lr-tb"/>
    </style:style>
    <style:style style:name="gr12" style:family="graphic" style:parent-style-name="standard">
      <style:graphic-properties draw:fill="none" loext:fill-use-slide-background="false" draw:textarea-horizontal-align="justify" draw:textarea-vertical-align="middle" draw:auto-grow-height="false" fo:min-height="3.188cm" fo:min-width="10.876cm" style:writing-mode="lr-tb" loext:decorative="false"/>
      <style:paragraph-properties style:writing-mode="lr-tb"/>
    </style:style>
    <style:style style:name="gr13" style:family="graphic" style:parent-style-name="standard">
      <style:graphic-properties draw:fill="none" loext:fill-use-slide-background="false" draw:textarea-horizontal-align="left" draw:textarea-vertical-align="middle" draw:auto-grow-height="false" fo:min-height="10.924cm" fo:min-width="10.675cm" style:writing-mode="lr-tb" loext:decorative="false"/>
      <style:paragraph-properties style:writing-mode="lr-tb"/>
    </style:style>
    <style:style style:name="gr14" style:family="graphic" style:parent-style-name="standard">
      <style:graphic-properties draw:fill="none" loext:fill-use-slide-background="false" draw:textarea-horizontal-align="justify" draw:textarea-vertical-align="middle" draw:auto-grow-height="false" fo:min-height="2.615cm" fo:min-width="10.938cm" style:writing-mode="lr-tb" loext:decorative="false"/>
      <style:paragraph-properties style:writing-mode="lr-tb"/>
    </style:style>
    <style:style style:name="gr15" style:family="graphic" style:parent-style-name="standard">
      <style:graphic-properties draw:fill="none" loext:fill-use-slide-background="false" draw:textarea-horizontal-align="justify" draw:textarea-vertical-align="middle" draw:auto-grow-height="false" fo:min-height="7.772cm" fo:min-width="10.38cm" style:writing-mode="lr-tb" loext:decorative="false"/>
      <style:paragraph-properties style:writing-mode="lr-tb"/>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fill="none" loext:fill-use-slide-background="false" draw:textarea-horizontal-align="left" draw:textarea-vertical-align="middle" draw:auto-grow-height="false" fo:min-height="3.155cm" fo:min-width="10.88cm" style:writing-mode="lr-tb" loext:decorative="false"/>
      <style:paragraph-properties style:writing-mode="lr-tb"/>
    </style:style>
    <style:style style:name="gr18" style:family="graphic" style:parent-style-name="standard" style:list-style-name="L1">
      <style:graphic-properties draw:fill="none" draw:textarea-horizontal-align="left" draw:textarea-vertical-align="middle" draw:auto-grow-height="false" fo:min-height="5.382cm" fo:min-width="10.64cm" style:writing-mode="lr-tb" loext:decorative="false"/>
      <style:paragraph-properties style:writing-mode="lr-tb"/>
    </style:style>
    <style:style style:name="gr19" style:family="graphic" style:parent-style-name="standard">
      <style:graphic-properties draw:fill="none" loext:fill-use-slide-background="false" draw:textarea-horizontal-align="justify" draw:textarea-vertical-align="middle" draw:auto-grow-height="false" fo:min-height="6.626cm" fo:min-width="10.504cm" style:writing-mode="lr-tb" loext:decorative="false"/>
      <style:paragraph-properties style:writing-mode="lr-tb"/>
    </style:style>
    <style:style style:name="gr20" style:family="graphic" style:parent-style-name="standard">
      <style:graphic-properties draw:fill="none" loext:fill-use-slide-background="false" draw:textarea-horizontal-align="justify" draw:textarea-vertical-align="middle" draw:auto-grow-height="false" fo:min-height="7.199cm" fo:min-width="10.442cm" style:writing-mode="lr-tb" loext:decorative="false"/>
      <style:paragraph-properties style:writing-mode="lr-tb"/>
    </style:style>
    <style:style style:name="gr21" style:family="graphic" style:parent-style-name="standard">
      <style:graphic-properties draw:fill="none" loext:fill-use-slide-background="false" draw:textarea-horizontal-align="left" draw:textarea-vertical-align="middle" draw:auto-grow-height="false" fo:min-height="9.206cm" fo:min-width="16.259cm" style:writing-mode="lr-tb"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middle" draw:auto-grow-height="false" fo:min-height="23.687cm" fo:min-width="10.102cm" style:writing-mode="lr-tb" loext:decorative="false"/>
      <style:paragraph-properties style:writing-mode="lr-tb"/>
    </style:style>
    <style:style style:name="gr23" style:family="graphic" style:parent-style-name="standard" style:list-style-name="L1">
      <style:graphic-properties draw:fill="none" draw:textarea-vertical-align="middle" draw:auto-grow-height="false" fo:min-height="5.194cm" fo:min-width="11.818cm" style:writing-mode="lr-tb" loext:decorative="false"/>
      <style:paragraph-properties style:writing-mode="lr-tb"/>
    </style:style>
    <style:style style:name="gr24" style:family="graphic" style:parent-style-name="standard">
      <style:graphic-properties draw:fill="none" loext:fill-use-slide-background="false" draw:textarea-horizontal-align="justify" draw:textarea-vertical-align="middle" draw:auto-grow-height="false" fo:min-height="10.351cm" fo:min-width="10.736cm" style:writing-mode="lr-tb" loext:decorative="false"/>
      <style:paragraph-properties style:writing-mode="lr-tb"/>
    </style:style>
    <style:style style:name="gr25" style:family="graphic" style:parent-style-name="standard">
      <style:graphic-properties draw:fill="none" loext:fill-use-slide-background="false" draw:textarea-horizontal-align="justify" draw:textarea-vertical-align="middle" draw:auto-grow-height="false" fo:min-height="11.815cm" fo:min-width="11.247cm" style:writing-mode="lr-tb" loext:decorative="false"/>
      <style:paragraph-properties style:writing-mode="lr-tb"/>
    </style:style>
    <style:style style:name="gr26" style:family="graphic" style:parent-style-name="standard">
      <style:graphic-properties draw:fill="none" loext:fill-use-slide-background="false" draw:textarea-horizontal-align="justify" draw:textarea-vertical-align="middle" draw:auto-grow-height="false" fo:min-height="23.686cm" fo:min-width="10.102cm" style:writing-mode="lr-tb" loext:decorative="false"/>
      <style:paragraph-properties style:writing-mode="lr-tb"/>
    </style:style>
    <style:style style:name="gr27" style:family="graphic" style:parent-style-name="standard">
      <style:graphic-properties draw:fill="none" loext:fill-use-slide-background="false" draw:textarea-horizontal-align="justify" draw:textarea-vertical-align="middle" draw:auto-grow-height="false" fo:min-height="6.34cm" fo:min-width="10.536cm" style:writing-mode="lr-tb"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16.066cm" fo:min-width="10.102cm" style:writing-mode="lr-tb" loext:decorative="false"/>
      <style:paragraph-properties style:writing-mode="lr-tb"/>
    </style:style>
    <style:style style:name="gr29" style:family="graphic" style:parent-style-name="standard">
      <style:graphic-properties draw:fill="none" loext:fill-use-slide-background="false" draw:textarea-horizontal-align="left" draw:textarea-vertical-align="middle" draw:auto-grow-height="false" fo:min-height="1.866cm" fo:min-width="9.067cm" style:writing-mode="lr-tb" loext:decorative="false"/>
      <style:paragraph-properties style:writing-mode="lr-tb"/>
    </style:style>
    <style:style style:name="gr30" style:family="graphic" style:parent-style-name="standard">
      <style:graphic-properties draw:fill="none" loext:fill-use-slide-background="false" draw:textarea-horizontal-align="left" draw:textarea-vertical-align="middle" draw:auto-grow-height="false" fo:min-height="6.147cm" fo:min-width="8.522cm" style:writing-mode="lr-tb" loext:decorative="false"/>
      <style:paragraph-properties style:writing-mode="lr-tb"/>
    </style:style>
    <style:style style:name="gr31" style:family="graphic" style:parent-style-name="standard">
      <style:graphic-properties draw:stroke="none" draw:fill="none" loext:fill-use-slide-background="false" draw:textarea-horizontal-align="justify" draw:textarea-vertical-align="middle" draw:auto-grow-height="false" fo:min-height="2.607cm" fo:min-width="10.613cm" style:writing-mode="lr-tb" loext:decorative="false"/>
      <style:paragraph-properties style:writing-mode="lr-tb"/>
    </style:style>
    <style:style style:name="gr32" style:family="graphic" style:parent-style-name="standard">
      <style:graphic-properties draw:stroke="none" draw:fill="none" loext:fill-use-slide-background="false" draw:textarea-horizontal-align="justify" draw:textarea-vertical-align="middle" draw:auto-grow-height="false" fo:min-height="2.607cm" fo:min-width="11.565cm" style:writing-mode="lr-tb" loext:decorative="false"/>
      <style:paragraph-properties style:writing-mode="lr-tb"/>
    </style:style>
    <style:style style:name="gr33" style:family="graphic" style:parent-style-name="standard">
      <style:graphic-properties draw:fill="none" loext:fill-use-slide-background="false" draw:textarea-horizontal-align="justify" draw:textarea-vertical-align="middle" draw:auto-grow-height="false" fo:min-height="2.042cm" fo:min-width="11cm" style:writing-mode="lr-tb" loext:decorative="false"/>
      <style:paragraph-properties style:writing-mode="lr-tb"/>
    </style:style>
    <style:style style:name="gr34" style:family="graphic" style:parent-style-name="standard">
      <style:graphic-properties draw:fill="none" loext:fill-use-slide-background="false" draw:textarea-horizontal-align="justify" draw:textarea-vertical-align="middle" draw:auto-grow-height="false" fo:min-height="8.918cm" fo:min-width="10.256cm" style:writing-mode="lr-tb" loext:decorative="false"/>
      <style:paragraph-properties style:writing-mode="lr-tb"/>
    </style:style>
    <style:style style:name="gr35" style:family="graphic" style:parent-style-name="standard">
      <style:graphic-properties draw:fill="none" loext:fill-use-slide-background="false" draw:textarea-horizontal-align="left" draw:textarea-vertical-align="middle" draw:auto-grow-height="false" fo:min-height="1.866cm" fo:min-width="9.719cm" style:writing-mode="lr-tb" loext:decorative="false"/>
      <style:paragraph-properties style:writing-mode="lr-tb"/>
    </style:style>
    <style:style style:name="co1" style:family="table-column">
      <style:table-column-properties style:column-width="12.252cm" style:use-optimal-column-width="false"/>
    </style:style>
    <style:style style:name="co2" style:family="table-column">
      <style:table-column-properties style:column-width="12.256cm" style:use-optimal-column-width="false"/>
    </style:style>
    <style:style style:name="co3" style:family="table-column">
      <style:table-column-properties style:column-width="9.84cm" style:use-optimal-column-width="false"/>
    </style:style>
    <style:style style:name="co4" style:family="table-column">
      <style:table-column-properties style:column-width="9.848cm" style:use-optimal-column-width="false"/>
    </style:style>
    <style:style style:name="co5" style:family="table-column">
      <style:table-column-properties style:column-width="6.72cm" style:use-optimal-column-width="false"/>
    </style:style>
    <style:style style:name="co6" style:family="table-column">
      <style:table-column-properties style:column-width="6.728cm" style:use-optimal-column-width="false"/>
    </style:style>
    <style:style style:name="co7" style:family="table-column">
      <style:table-column-properties style:column-width="12.038cm" style:use-optimal-column-width="false"/>
    </style:style>
    <style:style style:name="co8" style:family="table-column">
      <style:table-column-properties style:column-width="12.045cm" style:use-optimal-column-width="false"/>
    </style:style>
    <style:style style:name="co9" style:family="table-column">
      <style:table-column-properties style:column-width="8.339cm" style:use-optimal-column-width="false"/>
    </style:style>
    <style:style style:name="co10" style:family="table-column">
      <style:table-column-properties style:column-width="8.342cm" style:use-optimal-column-width="false"/>
    </style:style>
    <style:style style:name="co11" style:family="table-column">
      <style:table-column-properties style:column-width="7.049cm" style:use-optimal-column-width="false"/>
    </style:style>
    <style:style style:name="co12" style:family="table-column">
      <style:table-column-properties style:column-width="7.05cm" style:use-optimal-column-width="false"/>
    </style:style>
    <style:style style:name="co13" style:family="table-column">
      <style:table-column-properties style:column-width="7.318cm" style:use-optimal-column-width="false"/>
    </style:style>
    <style:style style:name="co14" style:family="table-column">
      <style:table-column-properties style:column-width="7.323cm" style:use-optimal-column-width="false"/>
    </style:style>
    <style:style style:name="co15" style:family="table-column">
      <style:table-column-properties style:column-width="7.902cm" style:use-optimal-column-width="false"/>
    </style:style>
    <style:style style:name="co16" style:family="table-column">
      <style:table-column-properties style:column-width="7.904cm" style:use-optimal-column-width="false"/>
    </style:style>
    <style:style style:name="co17" style:family="table-column">
      <style:table-column-properties style:column-width="4.699cm" style:use-optimal-column-width="false"/>
    </style:style>
    <style:style style:name="co18" style:family="table-column">
      <style:table-column-properties style:column-width="4.701cm" style:use-optimal-column-width="false"/>
    </style:style>
    <style:style style:name="ro1" style:family="table-row">
      <style:table-row-properties style:row-height="8.526cm" style:use-optimal-row-height="false"/>
    </style:style>
    <style:style style:name="ro2" style:family="table-row">
      <style:table-row-properties style:row-height="12.411cm" style:use-optimal-row-height="false"/>
    </style:style>
    <style:style style:name="ro3" style:family="table-row">
      <style:table-row-properties style:row-height="11.037cm" style:use-optimal-row-height="false"/>
    </style:style>
    <style:style style:name="ro4" style:family="table-row">
      <style:table-row-properties style:row-height="11.856cm" style:use-optimal-row-height="false"/>
    </style:style>
    <style:style style:name="ro5" style:family="table-row">
      <style:table-row-properties style:row-height="31.485cm" style:use-optimal-row-height="false"/>
    </style:style>
    <style:style style:name="ro6" style:family="table-row">
      <style:table-row-properties style:row-height="8.022cm" style:use-optimal-row-height="false"/>
    </style:style>
    <style:style style:name="ro7" style:family="table-row">
      <style:table-row-properties style:row-height="18.687cm" style:use-optimal-row-height="false"/>
    </style:style>
    <style:style style:name="ro8" style:family="table-row">
      <style:table-row-properties style:row-height="10.866cm" style:use-optimal-row-height="false"/>
    </style:style>
    <style:style style:name="ro9" style:family="table-row">
      <style:table-row-properties style:row-height="4.467cm" style:use-optimal-row-height="false"/>
    </style:style>
    <style:style style:name="ro10" style:family="table-row">
      <style:table-row-properties style:row-height="12.288cm" style:use-optimal-row-height="false"/>
    </style:style>
    <style:style style:name="ro11" style:family="table-row">
      <style:table-row-properties style:row-height="1.441cm" style:use-optimal-row-height="false"/>
    </style:style>
    <style:style style:name="ce1" style:family="table-cell">
      <style:paragraph-properties fo:border="0.43pt solid #000000"/>
    </style:style>
    <style:style style:name="ce2" style:family="table-cell">
      <style:text-properties fo:font-size="14pt" style:font-size-asian="14pt" style:font-size-complex="14pt"/>
    </style:style>
    <style:style style:name="P1" style:family="paragraph">
      <loext:graphic-properties draw:fill="none"/>
      <style:paragraph-properties fo:text-align="center"/>
    </style:style>
    <style:style style:name="P2" style:family="paragraph">
      <style:paragraph-properties fo:margin-top="0.42cm" fo:margin-bottom="0.35cm" fo:text-align="left"/>
      <style:text-properties fo:font-size="14pt"/>
    </style:style>
    <style:style style:name="P3" style:family="paragraph">
      <loext:graphic-properties draw:fill="none"/>
      <style:paragraph-properties fo:margin-top="0.42cm" fo:margin-bottom="0.35cm" fo:text-align="left" style:writing-mode="lr-tb"/>
      <style:text-properties fo:font-size="14pt"/>
    </style:style>
    <style:style style:name="P4" style:family="paragraph">
      <style:paragraph-properties fo:margin-left="0cm" fo:margin-right="0cm" fo:margin-top="0cm" fo:margin-bottom="0cm" fo:line-height="100%" fo:text-align="left" fo:text-indent="0cm"/>
      <style:text-properties style:use-window-font-color="true" loext:opacity="0%" fo:font-size="14pt"/>
    </style:style>
    <style:style style:name="P5" style:family="paragraph">
      <loext:graphic-properties draw:fill="none"/>
      <style:paragraph-properties fo:margin-left="0cm" fo:margin-right="0cm" fo:margin-top="0cm" fo:margin-bottom="0cm" fo:line-height="100%" fo:text-align="left" fo:text-indent="0cm" style:writing-mode="lr-tb"/>
      <style:text-properties style:use-window-font-color="true" loext:opacity="0%" fo:font-size="14pt"/>
    </style:style>
    <style:style style:name="P6" style:family="paragraph">
      <style:paragraph-properties fo:margin-left="0cm" fo:margin-right="0cm" fo:margin-top="0cm" fo:margin-bottom="0cm" fo:line-height="100%" fo:text-align="left" fo:text-indent="0cm"/>
      <style:text-properties fo:font-size="14pt"/>
    </style:style>
    <style:style style:name="P7" style:family="paragraph">
      <loext:graphic-properties draw:fill="none"/>
      <style:paragraph-properties fo:margin-left="0cm" fo:margin-right="0cm" fo:margin-top="0cm" fo:margin-bottom="0cm" fo:line-height="100%" fo:text-align="left" fo:text-indent="0cm" style:writing-mode="lr-tb"/>
      <style:text-properties fo:font-size="14pt"/>
    </style:style>
    <style:style style:name="P8" style:family="paragraph">
      <style:paragraph-properties fo:margin-left="0cm" fo:margin-right="0cm" fo:margin-top="0.42cm" fo:margin-bottom="0.35cm" fo:line-height="100%" fo:text-align="left" fo:text-indent="0cm"/>
      <style:text-properties fo:font-size="14pt"/>
    </style:style>
    <style:style style:name="P9" style:family="paragraph">
      <loext:graphic-properties draw:fill="none"/>
      <style:paragraph-properties fo:margin-left="0cm" fo:margin-right="0cm" fo:margin-top="0.42cm" fo:margin-bottom="0.35cm" fo:line-height="100%" fo:text-align="left" fo:text-indent="0cm" style:writing-mode="lr-tb"/>
      <style:text-properties fo:font-size="14pt"/>
    </style:style>
    <style:style style:name="P10" style:family="paragraph">
      <style:paragraph-properties fo:margin-top="0.42cm" fo:margin-bottom="0.35cm" fo:text-align="left"/>
      <style:text-properties fo:font-size="10pt" style:font-size-asian="10pt" style:font-size-complex="10pt"/>
    </style:style>
    <style:style style:name="P11" style:family="paragraph">
      <loext:graphic-properties draw:fill="none"/>
      <style:paragraph-properties fo:margin-top="0.42cm" fo:margin-bottom="0.35cm" fo:text-align="left" style:writing-mode="lr-tb"/>
      <style:text-properties fo:font-size="10pt" style:font-size-asian="10pt" style:font-size-complex="10pt"/>
    </style:style>
    <style:style style:name="P12" style:family="paragraph">
      <loext:graphic-properties draw:fill="none"/>
      <style:paragraph-properties fo:text-align="left" style:writing-mode="lr-tb"/>
      <style:text-properties fo:font-size="14pt"/>
    </style:style>
    <style:style style:name="P13" style:family="paragraph">
      <style:paragraph-properties fo:text-align="left"/>
      <style:text-properties style:use-window-font-color="true" loext:opacity="0%" fo:font-size="14pt"/>
    </style:style>
    <style:style style:name="P14" style:family="paragraph">
      <loext:graphic-properties draw:fill="none"/>
      <style:paragraph-properties fo:text-align="left" style:writing-mode="lr-tb"/>
      <style:text-properties style:use-window-font-color="true" loext:opacity="0%" fo:font-size="14pt"/>
    </style:style>
    <style:style style:name="P15" style:family="paragraph">
      <style:paragraph-properties fo:text-align="left"/>
      <style:text-properties fo:font-size="14pt"/>
    </style:style>
    <style:style style:name="P16" style:family="paragraph">
      <style:paragraph-properties fo:margin-left="0cm" fo:margin-right="0cm" fo:text-indent="0cm"/>
      <style:text-properties style:font-name="Liberation Sans1" fo:font-size="14pt" style:letter-kerning="true" style:font-name-asian="Microsoft YaHei1" style:font-size-asian="18pt" style:font-name-complex="Lucida Sans1" style:font-size-complex="18pt"/>
    </style:style>
    <style:style style:name="P17" style:family="paragraph">
      <loext:graphic-properties draw:fill="none"/>
      <style:paragraph-properties fo:margin-left="0cm" fo:margin-right="0cm" fo:text-indent="0cm" style:writing-mode="lr-tb"/>
      <style:text-properties style:font-name="Liberation Sans1" fo:font-size="14pt" style:letter-kerning="true" style:font-name-asian="Microsoft YaHei1" style:font-size-asian="18pt" style:font-name-complex="Lucida Sans1" style:font-size-complex="18pt"/>
    </style:style>
    <style:style style:name="P18" style:family="paragraph">
      <style:paragraph-properties fo:text-align="center"/>
      <style:text-properties fo:font-size="48pt"/>
    </style:style>
    <style:style style:name="P19" style:family="paragraph">
      <loext:graphic-properties draw:fill="none"/>
      <style:paragraph-properties fo:text-align="center" style:writing-mode="lr-tb"/>
      <style:text-properties fo:font-size="48pt"/>
    </style:style>
    <style:style style:name="P20" style:family="paragraph">
      <style:paragraph-properties fo:text-align="left"/>
    </style:style>
    <style:style style:name="P21" style:family="paragraph">
      <style:text-properties style:font-size-asian="14pt" style:font-size-complex="14pt"/>
    </style:style>
    <style:style style:name="T1" style:family="text">
      <style:text-properties fo:color="#127622" loext:opacity="100%" fo:font-size="14pt" style:font-size-asian="14pt" style:font-size-complex="14pt"/>
    </style:style>
    <style:style style:name="T2" style:family="text">
      <style:text-properties fo:font-size="14pt" style:font-size-asian="14pt" style:font-size-complex="14pt"/>
    </style:style>
    <style:style style:name="T3" style:family="text">
      <style:text-properties fo:color="#ff0000" loext:opacity="100%" fo:font-size="14pt" style:font-size-asian="14pt" style:font-size-complex="14pt"/>
    </style:style>
    <style:style style:name="T4" style:family="text">
      <style:text-properties fo:color="#ff0000" loext:opacity="100%" fo:font-size="14pt" fo:background-color="#fff5ce" style:font-size-asian="14pt" style:font-size-complex="14pt"/>
    </style:style>
    <style:style style:name="T5" style:family="text">
      <style:text-properties fo:color="#ff0000" loext:opacity="100%" fo:font-size="14pt" fo:background-color="#b4c7dc" style:font-size-asian="14pt" style:font-size-complex="14pt"/>
    </style:style>
    <style:style style:name="T6" style:family="text">
      <style:text-properties fo:color="#ff0000" loext:opacity="100%" fo:font-size="14pt" fo:background-color="#b7b3ca" style:font-size-asian="14pt" style:font-size-complex="14pt"/>
    </style:style>
    <style:style style:name="T7" style:family="text">
      <style:text-properties fo:color="#ff0000" loext:opacity="100%" fo:font-size="14pt" fo:background-color="#ffdbb6" style:font-size-asian="14pt" style:font-size-complex="14pt"/>
    </style:style>
    <style:style style:name="T8" style:family="text">
      <style:text-properties fo:color="#ff0000" loext:opacity="100%" fo:font-size="14pt" fo:background-color="#ffffd7" style:font-size-asian="14pt" style:font-size-complex="14pt"/>
    </style:style>
    <style:style style:name="T9" style:family="text">
      <style:text-properties fo:color="#127622" loext:opacity="100%"/>
    </style:style>
    <style:style style:name="T10" style:family="text">
      <style:text-properties style:text-position="9% 100%"/>
    </style:style>
    <style:style style:name="T11" style:family="text">
      <style:text-properties fo:color="#ff0000" loext:opacity="100%"/>
    </style:style>
    <style:style style:name="T12" style:family="text">
      <style:text-properties fo:color="#ff0000" loext:opacity="100%" fo:background-color="#b4c7dc"/>
    </style:style>
    <style:style style:name="T13" style:family="text">
      <style:text-properties fo:color="#ff0000" loext:opacity="100%" fo:background-color="#fff5ce"/>
    </style:style>
    <style:style style:name="T14" style:family="text">
      <style:text-properties fo:color="#127622" loext:opacity="100%" fo:font-size="14pt" style:font-size-asian="10pt" style:font-size-complex="10pt"/>
    </style:style>
    <style:style style:name="T15" style:family="text">
      <style:text-properties fo:font-size="14pt" style:font-size-asian="10pt" style:font-size-complex="10pt"/>
    </style:style>
    <style:style style:name="T16" style:family="text">
      <style:text-properties fo:color="#ff0000" loext:opacity="100%" fo:font-size="14pt" style:font-size-asian="10pt" style:font-size-complex="10pt"/>
    </style:style>
    <style:style style:name="T17" style:family="text">
      <style:text-properties fo:color="#ff0000" loext:opacity="100%" fo:font-size="14pt" fo:background-color="#fff5ce" style:font-size-asian="10pt" style:font-size-complex="10pt"/>
    </style:style>
    <style:style style:name="T18" style:family="text">
      <style:text-properties style:use-window-font-color="true" loext:opacity="0%" fo:font-size="14pt" style:font-size-asian="10pt" style:font-size-complex="10pt"/>
    </style:style>
    <style:style style:name="T19" style:family="text">
      <style:text-properties style:use-window-font-color="true" loext:opacity="0%" fo:font-size="14pt" fo:background-color="#fff5ce" style:font-size-asian="10pt" style:font-size-complex="10pt"/>
    </style:style>
    <style:style style:name="T20" style:family="text">
      <style:text-properties fo:color="#127622" loext:opacity="100%" fo:font-size="14pt"/>
    </style:style>
    <style:style style:name="T21" style:family="text">
      <style:text-properties fo:font-size="14pt"/>
    </style:style>
    <style:style style:name="T22" style:family="text">
      <style:text-properties fo:font-size="14pt" fo:background-color="#fff5ce"/>
    </style:style>
    <style:style style:name="T23" style:family="text">
      <style:text-properties style:use-window-font-color="true" loext:opacity="0%" fo:font-size="14pt"/>
    </style:style>
    <style:style style:name="T24" style:family="text">
      <style:text-properties style:use-window-font-color="true" loext:opacity="0%" fo:font-size="14pt" fo:background-color="#fff5ce"/>
    </style:style>
    <style:style style:name="T25" style:family="text">
      <style:text-properties fo:font-size="14pt" fo:background-color="#fff5ce" style:font-size-asian="10pt" style:font-size-complex="10pt"/>
    </style:style>
    <style:style style:name="T26" style:family="text">
      <style:text-properties fo:font-size="14pt" fo:background-color="#ffdbb6" style:font-size-asian="10pt" style:font-size-complex="10pt"/>
    </style:style>
    <style:style style:name="T27" style:family="text">
      <style:text-properties fo:font-size="14pt" fo:background-color="#b7b3ca" style:font-size-asian="10pt" style:font-size-complex="10pt"/>
    </style:style>
    <style:style style:name="T28" style:family="text">
      <style:text-properties fo:color="#ff0000" loext:opacity="100%" fo:font-size="14pt"/>
    </style:style>
    <style:style style:name="T29" style:family="text">
      <style:text-properties fo:color="#ff0000" loext:opacity="100%" fo:font-size="14pt" fo:background-color="#fff5ce"/>
    </style:style>
    <style:style style:name="T30" style:family="text">
      <style:text-properties fo:color="#127622" loext:opacity="100%" style:font-name="Liberation Sans1" fo:font-size="14pt" style:letter-kerning="true" style:font-name-asian="Microsoft YaHei1" style:font-size-asian="18pt" style:font-name-complex="Lucida Sans1" style:font-size-complex="18pt"/>
    </style:style>
    <style:style style:name="T31" style:family="text">
      <style:text-properties style:font-name="Liberation Sans1" fo:font-size="14pt" style:letter-kerning="true" style:font-name-asian="Microsoft YaHei1" style:font-size-asian="18pt" style:font-name-complex="Lucida Sans1" style:font-size-complex="18pt"/>
    </style:style>
    <style:style style:name="T32" style:family="text">
      <style:text-properties fo:color="#ff0000" loext:opacity="100%" style:font-name="Liberation Sans1" fo:font-size="14pt" style:letter-kerning="true" style:font-name-asian="Microsoft YaHei1" style:font-size-asian="18pt" style:font-name-complex="Lucida Sans1" style:font-size-complex="18pt"/>
    </style:style>
    <style:style style:name="T33" style:family="text">
      <style:text-properties fo:color="#ff0000" loext:opacity="100%" style:font-name="Liberation Sans1" fo:font-size="14pt" style:letter-kerning="true" fo:background-color="#fff5ce" style:font-name-asian="Microsoft YaHei1" style:font-size-asian="18pt" style:font-name-complex="Lucida Sans1" style:font-size-complex="18pt"/>
    </style:style>
    <style:style style:name="T34" style:family="text">
      <style:text-properties style:font-name="Liberation Sans1" fo:font-size="14pt" style:letter-kerning="true" fo:background-color="#fff5ce" style:font-name-asian="Microsoft YaHei1" style:font-size-asian="18pt" style:font-name-complex="Lucida Sans1" style:font-size-complex="18pt"/>
    </style:style>
    <style:style style:name="T35" style:family="text">
      <style:text-properties fo:font-size="48pt"/>
    </style:style>
    <style:style style:name="T36" style:family="text">
      <style:text-properties style:text-position="super 58%" fo:font-size="14pt" style:font-size-asian="14pt" style:font-size-complex="14pt"/>
    </style:style>
    <style:style style:name="T37" style:family="text">
      <style:text-properties style:text-position="super 58%"/>
    </style:style>
    <style:style style:name="T38" style:family="text">
      <style:text-properties style:text-position="super 58%"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xml:id="id9" draw:id="id9">
          <draw:glue-point draw:id="4" svg:x="4.051cm" svg:y="4.976cm"/>
          <draw:custom-shape draw:style-name="gr2" draw:text-style-name="P1" draw:layer="layout" svg:width="36.83cm" svg:height="20.955cm" svg:x="28.622cm" svg:y="56.93cm">
            <text:p/>
            <draw:enhanced-geometry svg:viewBox="0 0 21600 21600" draw:type="rectangle" draw:enhanced-path="M 0 0 L 21600 0 21600 21600 0 21600 0 0 Z N"/>
          </draw:custom-shape>
          <draw:frame draw:style-name="gr3" draw:layer="layout" svg:width="36.759cm" svg:height="20.936cm" svg:x="28.682cm" svg:y="56.937cm">
            <table:table table:template-name="default">
              <table:table-column table:style-name="co1"/>
              <table:table-column table:style-name="co1"/>
              <table:table-column table:style-name="co2"/>
              <table:table-row table:style-name="ro1" table:default-cell-style-name="ce1">
                <table:table-cell>
                  <text:p><text:span text:style-name="T1">Matthew 13:3-8</text:span><text:span text:style-name="T2"><text:line-break/></text:span><text:span text:style-name="T2">3 And he spake many things unto them in parables, saying, </text:span><text:span text:style-name="T3">Behold, a sower went forth to sow;</text:span><text:span text:style-name="T2"><text:line-break/></text:span><text:span text:style-name="T2">4 </text:span><text:span text:style-name="T3">And when he sowed, some seeds fell by the way side, and </text:span><text:span text:style-name="T4">the fowls</text:span><text:span text:style-name="T3"> came and </text:span><text:span text:style-name="T5">devoured them up</text:span><text:span text:style-name="T3">:</text:span><text:span text:style-name="T2"><text:line-break/></text:span><text:span text:style-name="T2">5 </text:span><text:span text:style-name="T3">Some fell upon stony places, where they had not much earth: and forthwith they sprung up, because they had no deepness of earth:</text:span><text:span text:style-name="T2"><text:line-break/></text:span><text:span text:style-name="T2">6 </text:span><text:span text:style-name="T3">And when the sun was up, they were scorched; and because they had no root, they withered away.</text:span><text:span text:style-name="T2"><text:line-break/></text:span><text:span text:style-name="T2">7 </text:span><text:span text:style-name="T3">And some fell among thorns; and the thorns sprung up, and choked them:</text:span><text:span text:style-name="T2"><text:line-break/></text:span><text:span text:style-name="T2">8 </text:span><text:span text:style-name="T3">But other fell into good ground, and brought forth fruit, some an hundredfold, some sixtyfold, some thirtyfold.</text:span></text:p>
                </table:table-cell>
                <table:table-cell>
                  <text:p><text:span text:style-name="T1">Mark 4:3-8</text:span><text:span text:style-name="T2"><text:line-break/></text:span><text:span text:style-name="T2">3 </text:span><text:span text:style-name="T3">Hearken; Behold, there went out a sower to sow:</text:span><text:span text:style-name="T2"><text:line-break/></text:span><text:span text:style-name="T2">4 </text:span><text:span text:style-name="T3">And it came to pass, as he sowed, some fell by the way side, and </text:span><text:span text:style-name="T4">the fowls of the air</text:span><text:span text:style-name="T3"> came and </text:span><text:span text:style-name="T5">devoured it up</text:span><text:span text:style-name="T3">.</text:span><text:span text:style-name="T2"><text:line-break/></text:span><text:span text:style-name="T2">5 </text:span><text:span text:style-name="T3">And some fell on stony ground, where it had not much earth; and immediately it sprang up, because it had no depth of earth:</text:span><text:span text:style-name="T2"><text:line-break/></text:span><text:span text:style-name="T2">6 </text:span><text:span text:style-name="T3">But when the sun was up, it was scorched; and because it had no root, it withered away.</text:span><text:span text:style-name="T2"><text:line-break/></text:span><text:span text:style-name="T2">7 </text:span><text:span text:style-name="T3">And some fell among thorns, and the thorns grew up, and choked it, and it yielded no fruit.</text:span><text:span text:style-name="T2"><text:line-break/></text:span><text:span text:style-name="T2">8 </text:span><text:span text:style-name="T3">And other fell on good ground, and did yield fruit that sprang up and increased; and brought forth, some thirty, and some sixty, and some an hundred.</text:span></text:p>
                </table:table-cell>
                <table:table-cell>
                  <text:p><text:span text:style-name="T1">Luke 8:5-8</text:span><text:span text:style-name="T2"><text:line-break/></text:span><text:span text:style-name="T2">5 </text:span><text:span text:style-name="T3">A sower went out to sow his seed: and as he sowed, some fell by the way side; and it was </text:span><text:span text:style-name="T6">trodden down</text:span><text:span text:style-name="T3">, and </text:span><text:span text:style-name="T4">the fowls of the air</text:span><text:span text:style-name="T3"> </text:span><text:span text:style-name="T5">devoured it</text:span><text:span text:style-name="T3">.</text:span><text:span text:style-name="T2"><text:line-break/></text:span><text:span text:style-name="T2">6 </text:span><text:span text:style-name="T3">And some fell upon a rock; and as soon as it was sprung up, it withered away, because it lacked moisture.</text:span><text:span text:style-name="T2"><text:line-break/></text:span><text:span text:style-name="T2">7 </text:span><text:span text:style-name="T3">And some fell among thorns; and the thorns sprang up with it, and choked it.</text:span><text:span text:style-name="T2"><text:line-break/></text:span><text:span text:style-name="T2">8 </text:span><text:span text:style-name="T3">And other fell on good ground, and sprang up, and bare fruit an hundredfold. And when he had said these things, he cried, He that hath ears to hear, let him hear.</text:span></text:p>
                </table:table-cell>
              </table:table-row>
              <table:table-row table:style-name="ro2" table:default-cell-style-name="ce1">
                <table:table-cell>
                  <text:p><text:span text:style-name="T1">Matthew 13:18-23</text:span><text:span text:style-name="T2"><text:line-break/></text:span><text:span text:style-name="T2">18 </text:span><text:span text:style-name="T3">Hear ye therefore the parable of the sower.</text:span><text:span text:style-name="T2"><text:line-break/></text:span><text:span text:style-name="T2">19 </text:span><text:span text:style-name="T3">When any one heareth the word of the kingdom, and understandeth it not, then cometh </text:span><text:span text:style-name="T7">the wicked one</text:span><text:span text:style-name="T3">, and </text:span><text:span text:style-name="T8">catcheth away</text:span><text:span text:style-name="T3"> that which was sown in his heart. This is he which received seed by the way side.</text:span><text:span text:style-name="T2"><text:line-break/></text:span><text:span text:style-name="T2">20 </text:span><text:span text:style-name="T3">But he that received the seed into stony places, the same is he that heareth the word, and anon with joy receiveth it;</text:span><text:span text:style-name="T2"><text:line-break/></text:span><text:span text:style-name="T2">21 </text:span><text:span text:style-name="T3">Yet hath he not root in himself, but dureth for a while: for when tribulation or persecution ariseth because of the word, by and by he is offended.</text:span><text:span text:style-name="T2"><text:line-break/></text:span><text:span text:style-name="T2">22 </text:span><text:span text:style-name="T3">He also that received seed among the thorns is he that heareth the word; and the care of this world, and the deceitfulness of riches, choke the word, and he becometh unfruitful.</text:span><text:span text:style-name="T2"><text:line-break/></text:span><text:span text:style-name="T2">23 </text:span><text:span text:style-name="T3">But he that received seed into the good ground is he that heareth the word, and understandeth it; which also beareth fruit, and bringeth forth, some an hundredfold, some sixty, some thirty.</text:span></text:p>
                </table:table-cell>
                <table:table-cell>
                  <text:p><text:span text:style-name="T1">Mark 4:14-20</text:span><text:span text:style-name="T2"><text:line-break/></text:span><text:span text:style-name="T2">14 </text:span><text:span text:style-name="T3">The sower soweth the word.</text:span><text:span text:style-name="T2"><text:line-break/></text:span><text:span text:style-name="T2">15 </text:span><text:span text:style-name="T3">And these are they by the way side, where the word is sown; but when they have heard, </text:span><text:span text:style-name="T7">Satan</text:span><text:span text:style-name="T3"> cometh immediately, and </text:span><text:span text:style-name="T8">taketh away</text:span><text:span text:style-name="T3"> the word that was sown in their hearts.</text:span><text:span text:style-name="T2"><text:line-break/></text:span><text:span text:style-name="T2">16 </text:span><text:span text:style-name="T3">And these are they likewise which are sown on stony ground; who, when they have heard the word, immediately receive it with gladness;</text:span><text:span text:style-name="T2"><text:line-break/></text:span><text:span text:style-name="T2">17 </text:span><text:span text:style-name="T3">And have no root in themselves, and so endure but for a time: afterward, when affliction or persecution ariseth for the word's sake, immediately they are offended.</text:span><text:span text:style-name="T2"><text:line-break/></text:span><text:span text:style-name="T2">18 </text:span><text:span text:style-name="T3">And these are they which are sown among thorns; such as hear the word,</text:span><text:span text:style-name="T2"><text:line-break/></text:span><text:span text:style-name="T2">19 </text:span><text:span text:style-name="T3">And the cares of this world, and the deceitfulness of riches, and the lusts of other things entering in, choke the word, and it becometh unfruitful.</text:span><text:span text:style-name="T2"><text:line-break/></text:span><text:span text:style-name="T2">20 </text:span><text:span text:style-name="T3">And these are they which are sown on good ground; such as hear the word, and receive it, and bring forth fruit, some thirtyfold, some sixty, and some an hundred.</text:span></text:p>
                </table:table-cell>
                <table:table-cell>
                  <text:p><text:span text:style-name="T1">Luke 8:11-15</text:span><text:span text:style-name="T2"><text:line-break/></text:span><text:span text:style-name="T2">11 </text:span><text:span text:style-name="T3">Now the parable is this: The seed is the word of God.</text:span><text:span text:style-name="T2"><text:line-break/></text:span><text:span text:style-name="T2">12 </text:span><text:span text:style-name="T3">Those by the way side are they that hear; then cometh </text:span><text:span text:style-name="T7">the devil</text:span><text:span text:style-name="T3">, and </text:span><text:span text:style-name="T8">taketh away</text:span><text:span text:style-name="T3"> the word out of their hearts, lest they should believe and be saved.</text:span><text:span text:style-name="T2"><text:line-break/></text:span><text:span text:style-name="T2">13 </text:span><text:span text:style-name="T3">They on the rock are they, which, when they hear, receive the word with joy; and these have no root, which for a while believe, and in time of temptation fall away.</text:span><text:span text:style-name="T2"><text:line-break/></text:span><text:span text:style-name="T2">14 </text:span><text:span text:style-name="T3">And that which fell among thorns are they, which, when they have heard, go forth, and are choked with cares and riches and pleasures of this life, and bring no fruit to perfection.</text:span><text:span text:style-name="T2"><text:line-break/></text:span><text:span text:style-name="T2">15 </text:span><text:span text:style-name="T3">But that on the good ground are they, which in an honest and good heart, having heard the word, keep it, and bring forth fruit with patience.</text:span></text:p>
                </table:table-cell>
              </table:table-row>
            </table:table>
            <draw:image xlink:href="Pictures/TablePreview1.svm" xlink:type="simple" xlink:show="embed" xlink:actuate="onLoad"/>
          </draw:frame>
        </draw:g>
        <draw:frame draw:style-name="gr3" xml:id="id7" draw:id="id7" draw:layer="layout" svg:width="29.527cm" svg:height="11.036cm" svg:x="84.88cm" svg:y="56.999cm">
          <table:table table:template-name="default" table:use-first-row-styles="true" table:use-banding-rows-styles="true">
            <table:table-column table:style-name="co3"/>
            <table:table-column table:style-name="co3"/>
            <table:table-column table:style-name="co4"/>
            <table:table-row table:style-name="ro3" table:default-cell-style-name="bg-none">
              <table:table-cell>
                <text:p><text:span text:style-name="T9">Matthew 13:31-32</text:span><text:line-break/><text:span text:style-name="T10">31</text:span> Another parable put he forth unto them, saying, <text:span text:style-name="T11">The </text:span><text:span text:style-name="T12">kingdom of heaven</text:span><text:span text:style-name="T11"> is like to a grain of mustard seed, which a man took, and sowed in his field:</text:span></text:p>
                <text:p><text:span text:style-name="T10">32</text:span> <text:span text:style-name="T11">Which indeed is the least of all seeds: but when it is grown, it is the greatest among herbs, and becometh a tree, so that </text:span><text:span text:style-name="T13">the birds of the air</text:span><text:span text:style-name="T11"> come and lodge in the branches thereof.</text:span></text:p>
              </table:table-cell>
              <table:table-cell>
                <text:p><text:span text:style-name="T9">Mark 4:30-32</text:span><text:span text:style-name="T11"><text:line-break/></text:span><text:span text:style-name="T10">30</text:span> And he said, <text:span text:style-name="T11">Whereunto shall we liken the </text:span><text:span text:style-name="T12">kingdom of God</text:span><text:span text:style-name="T11">? or with what comparison shall we compare it?</text:span></text:p>
                <text:p><text:span text:style-name="T10">31</text:span><text:span text:style-name="T11"> It is like a grain of mustard seed, which, when it is sown in the earth, is less than all the seeds that be in the earth:</text:span></text:p>
                <text:p><text:span text:style-name="T10">32</text:span><text:span text:style-name="T11"> But when it is sown, it groweth up, and becometh greater than all herbs, and shooteth out great branches; so that </text:span><text:span text:style-name="T13">the fowls of the air</text:span><text:span text:style-name="T11"> may lodge under the shadow of it.</text:span></text:p>
              </table:table-cell>
              <table:table-cell>
                <text:p><text:span text:style-name="T9">Luke 13:18-19</text:span><text:line-break/><text:span text:style-name="T10">18</text:span> Then said he, <text:span text:style-name="T11">Unto what is the </text:span><text:span text:style-name="T12">kingdom of God</text:span><text:span text:style-name="T11"> like? and whereunto shall I resemble it?</text:span></text:p>
                <text:p><text:span text:style-name="T10">19</text:span> <text:span text:style-name="T11">It is like a grain of mustard seed, which a man took, and cast into his garden; and it grew, and waxed a great tree; and </text:span><text:span text:style-name="T13">the fowls of the air</text:span><text:span text:style-name="T11"> lodged in the branches of it.</text:span></text:p>
              </table:table-cell>
            </table:table-row>
          </table:table>
          <draw:image xlink:href="Pictures/TablePreview2.svm" xlink:type="simple" xlink:show="embed" xlink:actuate="onLoad"/>
        </draw:frame>
        <draw:custom-shape draw:style-name="gr4" draw:text-style-name="P3" xml:id="id6" draw:id="id6" draw:layer="layout" svg:width="11.748cm" svg:height="5.06cm" svg:x="93.78cm" svg:y="48.55cm">
          <text:p text:style-name="P2"><text:span text:style-name="T14">Luke 17:20-21</text:span><text:span text:style-name="T15"><text:line-break/></text:span><text:span text:style-name="T15">20 And when he was demanded of the Pharisees, when the kingdom of God should come, he answered them and said, </text:span><text:span text:style-name="T16">The kingdom of God cometh not with observation:</text:span><text:span text:style-name="T15"><text:line-break/></text:span><text:span text:style-name="T15">21 </text:span><text:span text:style-name="T16">Neither shall they say, Lo here! or, lo there! for, behold, </text:span><text:span text:style-name="T17">the kingdom of God is within you</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10.805cm" svg:height="3.724cm" svg:x="70.691cm" svg:y="53.486cm">
          <text:p text:style-name="P4"><text:span text:style-name="T14">Job 28:20-21</text:span></text:p>
          <text:p text:style-name="P4"><text:span text:style-name="T18">20 Whence then cometh wisdom? and where is the place of understanding?</text:span></text:p>
          <text:p text:style-name="P4"><text:span text:style-name="T18">21 Seeing it is hid from the eyes of all living, and kept close from </text:span><text:span text:style-name="T19">the fowls of the air</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7" xml:id="id3" draw:id="id3" draw:layer="layout" svg:width="11.748cm" svg:height="3.492cm" svg:x="70.201cm" svg:y="57.93cm">
          <text:p text:style-name="P6"><text:span text:style-name="T20">Ecclesiastes 10:20</text:span></text:p>
          <text:p text:style-name="P6"><text:span text:style-name="T21">Curse not the king, no not in thy thought; and curse not the rich in thy bedchamber: for </text:span><text:span text:style-name="T22">a bird of the air</text:span><text:span text:style-name="T21"> shall carry the voice, and that which hath wings shall tell the ma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7" xml:id="id5" draw:id="id5" draw:layer="layout" svg:width="11.748cm" svg:height="3.223cm" svg:x="70.207cm" svg:y="69.527cm">
          <text:p text:style-name="P6"><text:span text:style-name="T20">Ephesians 2:2</text:span></text:p>
          <text:p text:style-name="P6"><text:span text:style-name="T23">Wherein in time past ye walked according to the course of this world, according to </text:span><text:span text:style-name="T24">the prince of the power of the air</text:span><text:span text:style-name="T23">, </text:span><text:span text:style-name="T24">the spirit</text:span><text:span text:style-name="T23"> that now worketh in the children of disobedi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9" xml:id="id4" draw:id="id4" draw:layer="layout" svg:width="12.383cm" svg:height="6.668cm" svg:x="69.886cm" svg:y="62.272cm">
          <text:p text:style-name="P8"><text:span text:style-name="T14">Revelation 12:7-9 </text:span><text:span text:style-name="T15"><text:line-break/></text:span><text:span text:style-name="T15">7 And there was war in heaven: Michael and his angels fought against the dragon; and </text:span><text:span text:style-name="T25">the dragon fought and his angels</text:span><text:span text:style-name="T15">, </text:span><text:span text:style-name="T15"><text:line-break/></text:span><text:span text:style-name="T15">8 And prevailed not; neither was their place found any more in heaven. </text:span><text:span text:style-name="T15"><text:line-break/></text:span><text:span text:style-name="T15">9 And the great dragon was cast out, that </text:span><text:span text:style-name="T26">old serpent</text:span><text:span text:style-name="T15">, called the </text:span><text:span text:style-name="T26">Devil</text:span><text:span text:style-name="T15">, and </text:span><text:span text:style-name="T26">Satan</text:span><text:span text:style-name="T15">, which deceiveth the whole world: he was cast out into the earth, </text:span><text:span text:style-name="T25">and his angels were cast out with him</text:span><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1" xml:id="id1" draw:id="id1" draw:layer="layout" svg:width="11.748cm" svg:height="3.175cm" svg:x="53.729cm" svg:y="52.112cm">
          <text:p text:style-name="P10"><text:span text:style-name="T14">Matthew 7:6</text:span><text:span text:style-name="T15"><text:line-break/></text:span><text:span text:style-name="T15">Give not that which is holy unto the dogs, neither cast ye your pearls before swine, lest they </text:span><text:span text:style-name="T27">trample</text:span><text:span text:style-name="T15"> them under their feet, and turn again and rend y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258cm" svg:y="14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4" draw:layer="layout" svg:width="11.748cm" svg:height="12.065cm" svg:x="155.622cm" svg:y="61.96cm">
          <text:p text:style-name="P13"><text:span text:style-name="T20">Luke 12:16-21</text:span></text:p>
          <text:p text:style-name="P13"><text:span text:style-name="T23">16 And he spake a parable unto them, saying, </text:span><text:span text:style-name="T28">The ground of a certain rich man brought forth plentifully:</text:span></text:p>
          <text:p text:style-name="P13"><text:span text:style-name="T23">17 </text:span><text:span text:style-name="T28">And he thought within himself, saying, What shall I do, because I have no room where to bestow my fruits?</text:span></text:p>
          <text:p text:style-name="P13"><text:span text:style-name="T23">18 </text:span><text:span text:style-name="T28">And he said, This will I do: I will pull down my barns, and build greater; and there will I bestow all my fruits and my goods.</text:span></text:p>
          <text:p text:style-name="P13"><text:span text:style-name="T23">19 </text:span><text:span text:style-name="T28">And I will say to my soul, Soul, thou hast much goods laid up for many years; take thine ease, eat, drink, and be merry.</text:span></text:p>
          <text:p text:style-name="P13"><text:span text:style-name="T23">20 </text:span><text:span text:style-name="T28">But God said unto him, Thou fool, this night thy soul shall be required of thee: then whose shall those things be, which thou hast provided?</text:span></text:p>
          <text:p text:style-name="P13"><text:span text:style-name="T23">21 </text:span><text:span text:style-name="T28">So is he that layeth up treasure for himself, and is not rich toward G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12" draw:layer="layout" svg:width="11.748cm" svg:height="3.81cm" svg:x="125.148cm" svg:y="118.348cm">
          <text:p text:style-name="P15"><text:span text:style-name="T20">Matthew 13:33</text:span></text:p>
          <text:p text:style-name="P15"><text:span text:style-name="T21">Another parable spake he unto them; </text:span><text:span text:style-name="T28">The kingdom of heaven is like unto leaven, which a woman took, and hid in three measures of meal, till the whole was leaven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3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4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2" xml:id="id13" draw:id="id13" draw:layer="layout" svg:width="12.383cm" svg:height="12.382cm" svg:x="87.994cm" svg:y="89.92cm">
          <text:p text:style-name="P15"><text:span text:style-name="T20">Matthew 24:30-31</text:span></text:p>
          <text:p text:style-name="P15"><text:span text:style-name="T21">30 </text:span><text:span text:style-name="T28">And then shall appear the sign of the Son of man in heaven: and then shall all the tribes of the earth mourn, and they shall see the Son of man coming in the clouds of heaven with power and great glory.</text:span></text:p>
          <text:p text:style-name="P15"><text:span text:style-name="T21">31 </text:span><text:span text:style-name="T28">And </text:span><text:span text:style-name="T29">he shall send his angels</text:span><text:span text:style-name="T28"> with a great sound of a trumpet, and </text:span><text:span text:style-name="T29">they shall gather together his elect</text:span><text:span text:style-name="T28"> from the four winds, from one end of heaven to the other.</text:span><text:span text:style-name="T28"><text:line-break/></text:span><text:span text:style-name="T28"><text:line-break/></text:span><text:span text:style-name="T20">Mark 13:26-27</text:span></text:p>
          <text:p text:style-name="P15"><text:span text:style-name="T23">26 </text:span><text:span text:style-name="T28">And then shall they see the Son of man coming in the clouds with great power and glory.</text:span></text:p>
          <text:p text:style-name="P15"><text:span text:style-name="T23">27 </text:span><text:span text:style-name="T28">And then shall </text:span><text:span text:style-name="T29">he send his angels</text:span><text:span text:style-name="T28">, and shall </text:span><text:span text:style-name="T29">gather together his elect</text:span><text:span text:style-name="T28"> from the four winds, from the uttermost part of the earth to the uttermost part of heav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2" draw:layer="layout" svg:width="11.748cm" svg:height="3.175cm" svg:x="142.605cm" svg:y="61.96cm">
          <text:p text:style-name="P15"><text:span text:style-name="T20">Matthew 15:13</text:span></text:p>
          <text:p text:style-name="P15"><text:span text:style-name="T23">But he answered and said, Every plant, which my heavenly Father hath not planted, shall be rooted 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1" xml:id="id20" draw:id="id20" draw:layer="layout" svg:width="11.748cm" svg:height="3.175cm" svg:x="127.365cm" svg:y="108.315cm">
          <text:p text:style-name="P10"><text:span text:style-name="T14">2 Timothy 2:6</text:span><text:span text:style-name="T15"><text:line-break/></text:span><text:span text:style-name="T15">The husbandman that laboureth must be first partaker of the fru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3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62.289cm" svg:y="74.977cm">
          <text:p text:style-name="P15"><text:span text:style-name="T20">Luke 6:47-49</text:span></text:p>
          <text:p text:style-name="P15"><text:span text:style-name="T21">47 </text:span><text:span text:style-name="T28">Whosoever cometh to me, and heareth my sayings, and doeth them, I will shew you to whom he is like:</text:span></text:p>
          <text:p text:style-name="P15"><text:span text:style-name="T21">48 </text:span><text:span text:style-name="T28">He is like a man which built an house, and digged deep, and laid the foundation on a rock: and when the flood arose, the stream beat vehemently upon that house, and could not shake it: for it was founded upon a rock.</text:span></text:p>
          <text:p text:style-name="P15"><text:span text:style-name="T21">49 </text:span><text:span text:style-name="T28">But he that heareth, and doeth not, is like a man that without a foundation built an house upon the earth; against which the stream did beat vehemently, and immediately it fell; and the ruin of that house was gr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59.603cm" svg:y1="55.287cm" svg:x2="62.899cm" svg:y2="56.93cm" draw:start-shape="id1" draw:start-glue-point="2" svg:d="M59603 55287c0 1608 3296 787 3296 1643" svg:viewBox="0 0 3297 1644">
          <text:p/>
        </draw:connector>
        <draw:connector draw:style-name="gr16" draw:text-style-name="P1" draw:layer="layout" draw:type="curve" svg:x1="76.093cm" svg:y1="57.21cm" svg:x2="76.075cm" svg:y2="57.93cm" draw:start-shape="id2" draw:start-glue-point="2" draw:end-shape="id3" draw:end-glue-point="0" svg:d="M76093 57210c0 541-18 182-18 720" svg:viewBox="0 0 19 721">
          <text:p/>
        </draw:connector>
        <draw:connector draw:style-name="gr16" draw:text-style-name="P1" draw:layer="layout" draw:type="curve" svg:x1="76.075cm" svg:y1="61.422cm" svg:x2="76.077cm" svg:y2="62.272cm" draw:start-shape="id3" draw:start-glue-point="2" draw:end-shape="id4" draw:end-glue-point="0" svg:d="M76075 61422c0 639 2 214 2 850" svg:viewBox="0 0 3 851">
          <text:p/>
        </draw:connector>
        <draw:connector draw:style-name="gr16" draw:text-style-name="P1" draw:layer="layout" draw:type="curve" svg:x1="76.077cm" svg:y1="68.94cm" svg:x2="76.081cm" svg:y2="69.527cm" draw:start-shape="id4" draw:start-glue-point="2" draw:end-shape="id5" draw:end-glue-point="0" svg:d="M76077 68940c0 441 4 148 4 587" svg:viewBox="0 0 5 588">
          <text:p/>
        </draw:connector>
        <draw:connector draw:style-name="gr16" draw:text-style-name="P1" draw:layer="layout" draw:type="curve" svg:x1="69.886cm" svg:y1="65.606cm" svg:x2="65.452cm" svg:y2="67.407cm" draw:start-shape="id4" draw:start-glue-point="3" svg:d="M69886 65606c-3702 0-1485 1801-4434 1801" svg:viewBox="0 0 4435 1802">
          <text:p/>
        </draw:connector>
        <draw:connector draw:style-name="gr16" draw:text-style-name="P1" draw:layer="layout" draw:type="curve" svg:x1="99.654cm" svg:y1="53.61cm" svg:x2="99.643cm" svg:y2="56.999cm" draw:start-shape="id6" draw:start-glue-point="2" draw:end-shape="id7" draw:end-glue-point="0" svg:d="M99654 53610c0 2530-11 836-11 3389" svg:viewBox="0 0 12 3390">
          <text:p/>
        </draw:connector>
        <draw:custom-shape draw:style-name="gr17" draw:text-style-name="P12" xml:id="id8" draw:id="id8" draw:layer="layout" svg:width="11.748cm" svg:height="3.773cm" svg:x="93.782cm" svg:y="69.617cm">
          <text:list text:style-name="L1">
            <text:list-item>
              <text:p text:style-name="P15"><text:span text:style-name="T21">The mustard seed is the word of God which liveth and abideth forever.</text:span></text:p>
            </text:list-item>
            <text:list-item>
              <text:p text:style-name="P15"><text:span text:style-name="T21">The tree is the Church (the body of Christ).</text:span></text:p>
            </text:list-item>
            <text:list-item>
              <text:p text:style-name="P15"><text:span text:style-name="T21">The “fowls/birds of the air” are the angels of the prince of the power of the air.</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7" xml:id="id18" draw:id="id18" draw:layer="layout" svg:width="11.748cm" svg:height="6.24cm" svg:x="88.406cm" svg:y="81.386cm">
          <text:p text:style-name="P16"><text:span text:style-name="T30">Genesis 3:14-15</text:span></text:p>
          <text:p text:style-name="P16"><text:span text:style-name="T31">14 And the LORD God said unto the serpent, </text:span><text:span text:style-name="T32">Because thou hast done this, thou art cursed above all cattle, and above every beast of the field; upon thy belly shalt thou go, and dust shalt thou eat all the days of thy life:</text:span><text:span text:style-name="T31"><text:line-break/></text:span><text:span text:style-name="T31">15 </text:span><text:span text:style-name="T32">And I will put enmity between thee and the woman, and </text:span><text:span text:style-name="T33">between thy seed and her seed</text:span><text:span text:style-name="T32">; it shall bruise thy head, and thou shalt bruise his he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xml:id="id19" draw:id="id19" draw:layer="layout" svg:width="11.748cm" svg:height="7.62cm" svg:x="113.394cm" svg:y="107.045cm">
          <text:p text:style-name="P15"><text:span text:style-name="T20">Mark 4:26-29</text:span></text:p>
          <text:p text:style-name="P15"><text:span text:style-name="T21">26 And he said, So is the kingdom of God, as if a man should cast seed into the ground;</text:span></text:p>
          <text:p text:style-name="P15"><text:span text:style-name="T21">27 And should sleep, and rise night and day, and the seed should spring and grow up, he knoweth not how.</text:span></text:p>
          <text:p text:style-name="P15"><text:span text:style-name="T21">28 For the earth bringeth forth fruit of herself; first the blade, then the ear, after that the full corn in the ear.</text:span></text:p>
          <text:p text:style-name="P15"><text:span text:style-name="T21">29 But when the fruit is brought forth, immediately he putteth in the sickle, because the harvest is co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2" draw:layer="layout" svg:width="11.748cm" svg:height="8.255cm" svg:x="146.414cm" svg:y="76.247cm">
          <text:p text:style-name="P15"><text:span text:style-name="T20">Luke 13:6-9</text:span></text:p>
          <text:p text:style-name="P15"><text:span text:style-name="T21">6 He spake also this parable; </text:span><text:span text:style-name="T28">A certain man had a fig tree planted in his vineyard; and he came and sought fruit thereon, and found none.</text:span></text:p>
          <text:p text:style-name="P15"><text:span text:style-name="T21">7 </text:span><text:span text:style-name="T28">Then said he unto the dresser of his vineyard, Behold, these three years I come seeking fruit on this fig tree, and find none: cut it down; why cumbereth it the ground?</text:span></text:p>
          <text:p text:style-name="P15"><text:span text:style-name="T21">8 </text:span><text:span text:style-name="T28">And he answering said unto him, Lord, let it alone this year also, till I shall dig about it, and dung it:</text:span></text:p>
          <text:p text:style-name="P15"><text:span text:style-name="T21">9 </text:span><text:span text:style-name="T28">And if it bear fruit, well: and if not, then after that thou shalt cut it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4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2" xml:id="id12" draw:id="id12" draw:layer="layout" svg:width="17.781cm" svg:height="10.478cm" svg:x="67.531cm" svg:y="81.962cm">
          <text:p text:style-name="P15"><text:span text:style-name="T20">Matthew 13:24-30</text:span></text:p>
          <text:p text:style-name="P15"><text:span text:style-name="T21">24 Another parable put he forth unto them, saying, </text:span><text:span text:style-name="T28">The kingdom of heaven is likened unto a man which sowed good seed in his field:</text:span></text:p>
          <text:p text:style-name="P15"><text:span text:style-name="T21">25 </text:span><text:span text:style-name="T28">But while men slept, his enemy came and sowed tares among the wheat, and went his way.</text:span></text:p>
          <text:p text:style-name="P15"><text:span text:style-name="T21">26 </text:span><text:span text:style-name="T28">But when the blade was sprung up, and brought forth fruit, then appeared the tares also.</text:span></text:p>
          <text:p text:style-name="P15"><text:span text:style-name="T21">27 </text:span><text:span text:style-name="T28">So the servants of the householder came and said unto him, Sir, didst not thou sow good seed in thy field? from whence then hath it tares?</text:span></text:p>
          <text:p text:style-name="P15"><text:span text:style-name="T21">28 </text:span><text:span text:style-name="T28">He said unto them, An enemy hath done this. The servants said unto him, Wilt thou then that we go and gather them up?</text:span></text:p>
          <text:p text:style-name="P15"><text:span text:style-name="T23">29</text:span><text:span text:style-name="T28"> But he said, Nay; lest while ye gather up the tares, ye root up also the wheat with them.</text:span></text:p>
          <text:p text:style-name="P15"><text:span text:style-name="T21">30 </text:span><text:span text:style-name="T28">Let both grow together until the harvest: and in the time of harvest I will say to the reapers, Gather ye together first the tares, and bind them in bundles to burn them: but gather the wheat into my ba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2" draw:layer="layout" svg:width="11.748cm" svg:height="25.083cm" svg:x="36.877cm" svg:y="88.63cm">
          <text:p text:style-name="P15"><text:span text:style-name="T20">Matthew 22:1-14</text:span></text:p>
          <text:p text:style-name="P15"><text:span text:style-name="T21">1 And Jesus answered and spake unto them again by parables, and said,</text:span></text:p>
          <text:p text:style-name="P15"><text:span text:style-name="T21">2 </text:span><text:span text:style-name="T28">The kingdom of heaven is like unto a certain king, which made a marriage for his son,</text:span></text:p>
          <text:p text:style-name="P15"><text:span text:style-name="T21">3 </text:span><text:span text:style-name="T28">And sent forth his servants to call them that were bidden to the wedding: and they would not come.</text:span></text:p>
          <text:p text:style-name="P15"><text:span text:style-name="T21">4 </text:span><text:span text:style-name="T28">Again, he sent forth other servants, saying, Tell them which are bidden, Behold, I have prepared my dinner: my oxen and my fatlings are killed, and all things are ready: come unto the marriage.</text:span></text:p>
          <text:p text:style-name="P15"><text:span text:style-name="T21">5 </text:span><text:span text:style-name="T28">But they made light of it, and went their ways, one to his farm, another to his merchandise:</text:span></text:p>
          <text:p text:style-name="P15"><text:span text:style-name="T21">6 </text:span><text:span text:style-name="T28">And the remnant took his servants, and entreated them spitefully, and slew them.</text:span></text:p>
          <text:p text:style-name="P15"><text:span text:style-name="T21">7 </text:span><text:span text:style-name="T28">But when the king heard thereof, he was wroth: and he sent forth his armies, and destroyed those murderers, and burned up their city.</text:span></text:p>
          <text:p text:style-name="P15"><text:span text:style-name="T21">8 </text:span><text:span text:style-name="T28">Then saith he to his servants, The wedding is ready, but they which were bidden were not worthy.</text:span></text:p>
          <text:p text:style-name="P15"><text:span text:style-name="T21">9 </text:span><text:span text:style-name="T28">Go ye therefore into the highways, and as many as ye shall find, bid to the marriage.</text:span></text:p>
          <text:p text:style-name="P15"><text:span text:style-name="T21">10 </text:span><text:span text:style-name="T28">So those servants went out into the highways, and gathered together all as many as they found, both bad and good: and the wedding was furnished with guests.</text:span></text:p>
          <text:p text:style-name="P15"><text:span text:style-name="T21">11 </text:span><text:span text:style-name="T28">And when the king came in to see the guests, he saw there a man which had not on a wedding garment:</text:span></text:p>
          <text:p text:style-name="P15"><text:span text:style-name="T21">12 </text:span><text:span text:style-name="T28">And he saith unto him, Friend, how camest thou in hither not having a wedding garment? And he was speechless.</text:span></text:p>
          <text:p text:style-name="P15"><text:span text:style-name="T21">13 </text:span><text:span text:style-name="T28">Then said the king to the servants, Bind him hand and foot, and take him away, and cast him into outer darkness; there shall be weeping and gnashing of teeth.</text:span></text:p>
          <text:p text:style-name="P15"><text:span text:style-name="T21">14 </text:span><text:span text:style-name="T28">For many are called, but few are chos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14.029cm" svg:y="96.567cm">
          <text:p text:style-name="P15"><text:span text:style-name="T20">Mark 3:23-27</text:span></text:p>
          <text:p text:style-name="P15"><text:span text:style-name="T21">23 And he called them unto him, and said unto them in parables, </text:span><text:span text:style-name="T28">How can Satan cast out Satan?</text:span></text:p>
          <text:p text:style-name="P15"><text:span text:style-name="T21">24 </text:span><text:span text:style-name="T28">And if a kingdom be divided against itself, that kingdom cannot stand.</text:span></text:p>
          <text:p text:style-name="P15"><text:span text:style-name="T21">25 </text:span><text:span text:style-name="T28">And if a house be divided against itself, that house cannot stand.</text:span></text:p>
          <text:p text:style-name="P15"><text:span text:style-name="T21">26 </text:span><text:span text:style-name="T28">And if Satan rise up against himself, and be divided, he cannot stand, but hath an end.</text:span></text:p>
          <text:p text:style-name="P15"><text:span text:style-name="T21">27 </text:span><text:span text:style-name="T28">No man can enter into a strong man's house, and spoil his goods, except he will first bind the strong man; and then he will spoil his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3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draw:layer="layout" svg:width="11.748cm" svg:height="7.62cm" svg:x="170.227cm" svg:y="63.23cm">
          <text:p text:style-name="P15"><text:span text:style-name="T20">Luke 6:43-45</text:span></text:p>
          <text:p text:style-name="P15"><text:span text:style-name="T21">43 </text:span><text:span text:style-name="T28">For a good tree bringeth not forth corrupt fruit; neither doth a corrupt tree bring forth good fruit.</text:span></text:p>
          <text:p text:style-name="P15"><text:span text:style-name="T21">44 </text:span><text:span text:style-name="T28">For every tree is known by his own fruit. For of thorns men do not gather figs, nor of a bramble bush gather they grapes.</text:span></text:p>
          <text:p text:style-name="P15"><text:span text:style-name="T21">45 </text:span><text:span text:style-name="T28">A good man out of the good treasure of his heart bringeth forth that which is good; and an evil man out of the evil treasure of his heart bringeth forth that which is evil: for of the abundance of the heart his mouth speake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17" xml:id="id17" draw:id="id17" draw:layer="layout" svg:width="12.906cm" svg:height="6.032cm" svg:x="26.829cm" svg:y="42.275cm">
          <text:p text:style-name="P16"><text:span text:style-name="T30">Isaiah 55:10-11</text:span></text:p>
          <text:p text:style-name="P16"><text:span text:style-name="T31">10 For as the rain cometh down, and the snow from heaven, and returneth not thither, but watereth the earth, and maketh it bring forth and bud, </text:span><text:span text:style-name="T34">that it may give seed to the sower</text:span><text:span text:style-name="T31">, and bread to the eater:</text:span></text:p>
          <text:p text:style-name="P16"><text:span text:style-name="T31">11 So shall my word be that goeth forth out of my mouth: it shall not return unto me void, but it shall accomplish that which I please, and it shall prosper in the thing whereto I sent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3" draw:id="id23" draw:layer="layout" svg:width="11.748cm" svg:height="5.715cm" svg:x="78.47cm" svg:y="43.862cm">
          <text:p text:style-name="P15"><text:span text:style-name="T20">Proverbs 20:19</text:span></text:p>
          <text:p text:style-name="P15"><text:span text:style-name="T21">He that goeth about as </text:span><text:span text:style-name="T22">a talebearer revealeth secrets</text:span><text:span text:style-name="T21">: therefore meddle not with him that flattereth with his li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3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11" xml:id="id15" draw:id="id15" draw:layer="layout" svg:width="12.382cm" svg:height="11.747cm" svg:x="70.24cm" svg:y="110.35cm">
          <text:p text:style-name="P10"><text:span text:style-name="T14">Revelation 20:11-15</text:span><text:span text:style-name="T15"><text:line-break/></text:span><text:span text:style-name="T15">11 And I saw a great white throne, and him that sat on it, from whose face the earth and the heaven fled away; and there was found no place for them.</text:span><text:span text:style-name="T15"><text:line-break/></text:span><text:span text:style-name="T15">12 And I saw the dead, small and great, stand before God; and the books were opened: and another book was opened, which is the book of life: and the dead were judged out of those things which were written in the books, according to their works.</text:span><text:span text:style-name="T15"><text:line-break/></text:span><text:span text:style-name="T15">13 And the sea gave up the dead which were in it; and death and hell delivered up the dead which were in them: and they were judged every man according to their works.</text:span><text:span text:style-name="T15"><text:line-break/></text:span><text:span text:style-name="T15">14 And death and hell were cast into the lake of fire. This is the second death.</text:span><text:span text:style-name="T15"><text:line-break/></text:span><text:span text:style-name="T15">15 And whosoever was not found written in the book of life was cast into the lake of f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1" draw:id="id21" draw:layer="layout" svg:width="11.748cm" svg:height="5.715cm" svg:x="129.587cm" svg:y="73.39cm">
          <text:p text:style-name="P15"><text:span text:style-name="T20">Mark 7:27-29</text:span></text:p>
          <text:p text:style-name="P15"><text:span text:style-name="T21">27 But Jesus said unto her, </text:span><text:span text:style-name="T28">Let the children first be filled: for it is not meet to take the children's bread, and to cast it unto the dogs.</text:span></text:p>
          <text:p text:style-name="P15"><text:span text:style-name="T21">28 And she answered and said unto him, Yes, Lord: yet the dogs under the table eat of the children's crumbs.</text:span></text:p>
          <text:p text:style-name="P15"><text:span text:style-name="T21">29 And he said unto her, </text:span><text:span text:style-name="T28">For this saying go thy way; the devil is gone out of thy daugh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12" xml:id="id16" draw:id="id16" draw:layer="layout" svg:width="13.017cm" svg:height="13.335cm" svg:x="11.795cm" svg:y="45.767cm">
          <text:p text:style-name="P15"><text:span text:style-name="T20">Isaiah 28:23-29</text:span></text:p>
          <text:p text:style-name="P15"><text:span text:style-name="T21">23 Give ye ear, and hear my voice; hearken, and hear my speech.</text:span></text:p>
          <text:p text:style-name="P15"><text:span text:style-name="T21">24 Doth the plowman plow all day to sow? doth he open and break the clods of his ground?</text:span></text:p>
          <text:p text:style-name="P15"><text:span text:style-name="T21">25 When he hath made plain the face thereof, doth he not cast abroad the fitches, and scatter the cummin, and cast in the principal wheat and the appointed barley and the rie in their place?</text:span></text:p>
          <text:p text:style-name="P15"><text:span text:style-name="T21">26 </text:span><text:span text:style-name="T22">For his God doth instruct him to discretion, and doth teach him.</text:span></text:p>
          <text:p text:style-name="P15"><text:span text:style-name="T21">27 For the fitches are not threshed with a threshing instrument, neither is a cart wheel turned about upon the cummin; but the fitches are beaten out with a staff, and the cummin with a rod.</text:span></text:p>
          <text:p text:style-name="P15"><text:span text:style-name="T21">28 Bread corn is bruised; because he will not ever be threshing it, nor break it with the wheel of his cart, nor bruise it with his horsemen.</text:span></text:p>
          <text:p text:style-name="P15"><text:span text:style-name="T21">29 This also cometh forth from the LORD of hosts, which is wonderful in counsel, and excellent in 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2" draw:layer="layout" svg:width="11.748cm" svg:height="25.082cm" svg:x="49.092cm" svg:y="88.63cm">
          <text:p text:style-name="P15"><text:span text:style-name="T20">Luke 14:16-24</text:span></text:p>
          <text:p text:style-name="P15"><text:span text:style-name="T21">16 Then said he unto him, </text:span><text:span text:style-name="T28">A certain man made a great supper, and bade many:</text:span></text:p>
          <text:p text:style-name="P15"><text:span text:style-name="T21">17 </text:span><text:span text:style-name="T28">And sent his servant at supper time to say to them that were bidden, Come; for all things are now ready.</text:span></text:p>
          <text:p text:style-name="P15"><text:span text:style-name="T21">18 </text:span><text:span text:style-name="T28">And they all with one consent began to make excuse. The first said unto him, I have bought a piece of ground, and I must needs go and see it: I pray thee have me excused.</text:span></text:p>
          <text:p text:style-name="P15"><text:span text:style-name="T21">19 </text:span><text:span text:style-name="T28">And another said, I have bought five yoke of oxen, and I go to prove them: I pray thee have me excused.</text:span></text:p>
          <text:p text:style-name="P15"><text:span text:style-name="T21">20 </text:span><text:span text:style-name="T28">And another said, I have married a wife, and therefore I cannot come.</text:span></text:p>
          <text:p text:style-name="P15"><text:span text:style-name="T21">21 </text:span><text:span text:style-name="T28">So that servant came, and shewed his lord these things. Then the master of the house being angry said to his servant, Go out quickly into the streets and lanes of the city, and bring in hither the poor, and the maimed, and the halt, and the blind.</text:span></text:p>
          <text:p text:style-name="P15"><text:span text:style-name="T21">22 </text:span><text:span text:style-name="T28">And the servant said, Lord, it is done as thou hast commanded, and yet there is room.</text:span></text:p>
          <text:p text:style-name="P15"><text:span text:style-name="T21">23 </text:span><text:span text:style-name="T28">And the lord said unto the servant, Go out into the highways and hedges, and compel them to come in, that my house may be filled.</text:span></text:p>
          <text:p text:style-name="P15"><text:span text:style-name="T21">24 </text:span><text:span text:style-name="T28">For I say unto you, That none of those men which were bidden shall taste of my sup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34.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12" xml:id="id14" draw:id="id14" draw:layer="layout" svg:width="11.748cm" svg:height="7.302cm" svg:x="70.556cm" svg:y="101.655cm">
          <text:p text:style-name="P15"><text:span text:style-name="T20">Revelation 14:14-16</text:span></text:p>
          <text:p text:style-name="P15"><text:span text:style-name="T21">14 And I looked, and behold a white cloud, and upon the cloud one sat like unto the Son of man, having on his head a golden crown, and in his hand a sharp sickle.</text:span></text:p>
          <text:p text:style-name="P15"><text:span text:style-name="T21">15 And another angel came out of the temple, crying with a loud voice to him that sat on the cloud, Thrust in thy sickle, and reap: for the time is come for thee to reap; for the harvest of the earth is ripe.</text:span></text:p>
          <text:p text:style-name="P15"><text:span text:style-name="T21">16 And he that sat on the cloud thrust in his sickle on the earth; and the earth was reap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2" draw:layer="layout" svg:width="11.748cm" svg:height="17.462cm" svg:x="129.587cm" svg:y="85.455cm">
          <text:p text:style-name="P15"><text:span text:style-name="T20">Mark 7:14-23</text:span></text:p>
          <text:p text:style-name="P15"><text:span text:style-name="T21">14 And when he had called all the people unto him, he said unto them, </text:span><text:span text:style-name="T28">Hearken unto me every one of you, and understand:</text:span></text:p>
          <text:p text:style-name="P15"><text:span text:style-name="T21">15 </text:span><text:span text:style-name="T28">There is nothing from without a man, that entering into him can defile him: but the things which come out of him, those are they that defile the man.</text:span></text:p>
          <text:p text:style-name="P15"><text:span text:style-name="T21">16 </text:span><text:span text:style-name="T28">If any man have ears to hear, let him hear.</text:span></text:p>
          <text:p text:style-name="P15"><text:span text:style-name="T21">17 And when he was entered into the house from the people, his disciples asked him concerning the parable.</text:span></text:p>
          <text:p text:style-name="P15"><text:span text:style-name="T21">18 And he saith unto them, </text:span><text:span text:style-name="T28">Are ye so without understanding also? Do ye not perceive, that whatsoever thing from without entereth into the man, it cannot defile him;</text:span></text:p>
          <text:p text:style-name="P15"><text:span text:style-name="T21">19 </text:span><text:span text:style-name="T28">Because it entereth not into his heart, but into the belly, and goeth out into the draught, purging all meats?</text:span></text:p>
          <text:p text:style-name="P15"><text:span text:style-name="T21">20 And he said, </text:span><text:span text:style-name="T28">That which cometh out of the man, that defileth the man.</text:span></text:p>
          <text:p text:style-name="P15"><text:span text:style-name="T21">21 </text:span><text:span text:style-name="T28">For from within, out of the heart of men, proceed evil thoughts, adulteries, fornications, murders,</text:span></text:p>
          <text:p text:style-name="P15"><text:span text:style-name="T21">22 </text:span><text:span text:style-name="T28">Thefts, covetousness, wickedness, deceit, lasciviousness, an evil eye, blasphemy, pride, foolishness:</text:span></text:p>
          <text:p text:style-name="P15"><text:span text:style-name="T21">23 </text:span><text:span text:style-name="T28">All these evil things come from within, and defile the 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99.656cm" svg:y1="69.617cm" svg:x2="99.643cm" svg:y2="68.035cm" draw:start-shape="id8" draw:start-glue-point="0" draw:end-shape="id7" draw:end-glue-point="2" svg:d="M99656 69617c0-1173-13-382-13-1582" svg:viewBox="0 0 14 1583">
          <text:p/>
        </draw:connector>
        <draw:connector draw:style-name="gr16" draw:text-style-name="P1" draw:layer="layout" draw:type="curve" svg:x1="82.269cm" svg:y1="65.606cm" svg:x2="84.88cm" svg:y2="62.517cm" draw:start-shape="id4" draw:start-glue-point="1" draw:end-shape="id7" draw:end-glue-point="3" svg:d="M82269 65606c1945 0 640-3089 2611-3089" svg:viewBox="0 0 2612 3090">
          <text:p/>
        </draw:connector>
        <draw:custom-shape draw:style-name="gr29" draw:text-style-name="P12" xml:id="id10" draw:id="id10" draw:layer="layout" svg:width="9.795cm" svg:height="2.344cm" svg:x="42.157cm" svg:y="78.813cm">
          <text:list text:style-name="L1">
            <text:list-item>
              <text:p text:style-name="P15"><text:span text:style-name="T21">Satan takes the seed away.</text:span></text:p>
            </text:list-item>
            <text:list-item>
              <text:p text:style-name="P15"><text:span text:style-name="T21">“the fowls of the air” devour the seed.</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47.037cm" svg:y1="77.885cm" svg:x2="47.054cm" svg:y2="78.813cm" draw:start-shape="id9" draw:start-glue-point="2" draw:end-shape="id10" draw:end-glue-point="0" svg:d="M47037 77885c0 708 17 244 17 928" svg:viewBox="0 0 18 929">
          <text:p/>
        </draw:connector>
        <draw:custom-shape draw:style-name="gr30" draw:text-style-name="P12" xml:id="id11" draw:id="id11" draw:layer="layout" svg:width="9.714cm" svg:height="7.089cm" svg:x="71.584cm" svg:y="93.606cm">
          <text:list text:style-name="L1">
            <text:list-item>
              <text:p text:style-name="P15"><text:span text:style-name="T21">The man which sows good seed is God.</text:span></text:p>
            </text:list-item>
            <text:list-item>
              <text:p text:style-name="P15"><text:span text:style-name="T21">His enemy who sowed false wheat is Satan (</text:span><text:span text:style-name="T20">Isaiah 14:14</text:span><text:span text:style-name="T21">).</text:span></text:p>
            </text:list-item>
            <text:list-item>
              <text:p text:style-name="P15"><text:span text:style-name="T21">The reapers are the angels of God.</text:span></text:p>
            </text:list-item>
            <text:list-item>
              <text:p text:style-name="P15"><text:span text:style-name="T21">The wheat are whosoever are written in the book of life.</text:span></text:p>
            </text:list-item>
            <text:list-item>
              <text:p text:style-name="P15"><text:span text:style-name="T21">The tares are whosoever is not found written in the book of life.</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76.441cm" svg:y1="93.606cm" svg:x2="76.421cm" svg:y2="92.44cm" draw:start-shape="id11" draw:start-glue-point="0" draw:end-shape="id12" draw:end-glue-point="2" svg:d="M76441 93606c0-874-20-292-20-1166" svg:viewBox="0 0 21 1167">
          <text:p/>
        </draw:connector>
        <draw:connector draw:style-name="gr16" draw:text-style-name="P1" draw:layer="layout" draw:type="curve" svg:x1="81.298cm" svg:y1="97.15cm" svg:x2="87.994cm" svg:y2="96.111cm" draw:start-shape="id11" draw:start-glue-point="1" draw:end-shape="id13" draw:end-glue-point="3" svg:d="M81298 97150c5022 0 1674-1039 6696-1039" svg:viewBox="0 0 6697 1040">
          <text:p/>
        </draw:connector>
        <draw:connector draw:style-name="gr16" draw:text-style-name="P1" draw:layer="layout" draw:type="curve" svg:x1="76.441cm" svg:y1="100.695cm" svg:x2="76.43cm" svg:y2="101.655cm" draw:start-shape="id11" draw:start-glue-point="2" draw:end-shape="id14" draw:end-glue-point="0" svg:d="M76441 100695c0 720-11 240-11 960" svg:viewBox="0 0 12 961">
          <text:p/>
        </draw:connector>
        <draw:connector draw:style-name="gr16" draw:text-style-name="P1" draw:layer="layout" draw:type="curve" svg:x1="76.43cm" svg:y1="108.957cm" svg:x2="76.431cm" svg:y2="110.35cm" draw:start-shape="id14" draw:start-glue-point="2" draw:end-shape="id15" draw:end-glue-point="0" svg:d="M76430 108957c0 1045 1 349 1 1393" svg:viewBox="0 0 2 1394">
          <text:p/>
        </draw:connector>
        <draw:custom-shape draw:style-name="gr31" draw:text-style-name="P19" draw:layer="layout" svg:width="11.113cm" svg:height="2.857cm" svg:x="41.64cm" svg:y="54.022cm">
          <text:p text:style-name="P18"><text:span text:style-name="T35">Sower</text:span></text:p>
          <draw:enhanced-geometry svg:viewBox="0 0 21600 21600" draw:type="rectangle" draw:enhanced-path="M 0 0 L 21600 0 21600 21600 0 21600 0 0 Z N"/>
        </draw:custom-shape>
        <draw:custom-shape draw:style-name="gr32" draw:text-style-name="P19" draw:layer="layout" svg:width="12.065cm" svg:height="2.857cm" svg:x="70.532cm" svg:y="78.788cm">
          <text:p text:style-name="P18"><text:span text:style-name="T35">Wheat &amp; Tares</text:span></text:p>
          <draw:enhanced-geometry svg:viewBox="0 0 21600 21600" draw:type="rectangle" draw:enhanced-path="M 0 0 L 21600 0 21600 21600 0 21600 0 0 Z N"/>
        </draw:custom-shape>
        <draw:custom-shape draw:style-name="gr32" draw:text-style-name="P19" draw:layer="layout" svg:width="12.065cm" svg:height="2.857cm" svg:x="92.644cm" svg:y="53.678cm">
          <text:p text:style-name="P18"><text:span text:style-name="T35">Mustard Seed</text:span></text:p>
          <draw:enhanced-geometry svg:viewBox="0 0 21600 21600" draw:type="rectangle" draw:enhanced-path="M 0 0 L 21600 0 21600 21600 0 21600 0 0 Z N"/>
        </draw:custom-shape>
        <draw:custom-shape draw:style-name="gr10" draw:text-style-name="P12" draw:layer="layout" svg:width="11.748cm" svg:height="5.715cm" svg:x="22.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7cm" svg:y="161.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8cm" svg:y="161.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8.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2" draw:layer="layout" svg:width="11.748cm" svg:height="2.54cm" svg:x="123.237cm" svg:y="136.572cm">
          <text:p text:style-name="P15"><text:span text:style-name="T20">Mark 9:49</text:span></text:p>
          <text:p text:style-name="P15"><text:span text:style-name="T28">For every one shall be salted with fire, and every sacrifice shall be salted with sa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12" draw:layer="layout" svg:width="11.748cm" svg:height="10.16cm" svg:x="184.197cm" svg:y="84.502cm">
          <text:p text:style-name="P15"><text:span text:style-name="T20">Luke 14:8-11</text:span></text:p>
          <text:p text:style-name="P15"><text:span text:style-name="T21">8 </text:span><text:span text:style-name="T28">When thou art bidden of any man to a wedding, sit not down in the highest room; lest a more honourable man than thou be bidden of him;</text:span></text:p>
          <text:p text:style-name="P15"><text:span text:style-name="T21">9 </text:span><text:span text:style-name="T28">And he that bade thee and him come and say to thee, Give this man place; and thou begin with shame to take the lowest room.</text:span></text:p>
          <text:p text:style-name="P15"><text:span text:style-name="T21">10 </text:span><text:span text:style-name="T28">But when thou art bidden, go and sit down in the lowest room; that when he that bade thee cometh, he may say unto thee, Friend, go up higher: then shalt thou have worship in the presence of them that sit at meat with thee.</text:span></text:p>
          <text:p text:style-name="P15"><text:span text:style-name="T21">11 </text:span><text:span text:style-name="T28">For whosoever exalteth himself shall be abased; and he that humbleth himself shall be exal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8.303cm" svg:y1="59.102cm" svg:x2="28.622cm" svg:y2="67.407cm" draw:start-shape="id16" draw:start-glue-point="2" draw:end-shape="id9" draw:end-glue-point="3" svg:d="M18303 59102c0 5537 3439 8305 10319 8305" svg:viewBox="0 0 10320 8306">
          <text:p/>
        </draw:connector>
        <draw:custom-shape draw:style-name="gr31" draw:text-style-name="P19" draw:layer="layout" svg:width="11.113cm" svg:height="2.857cm" svg:x="12.956cm" svg:y="42.116cm">
          <text:p text:style-name="P18"><text:span text:style-name="T35">Which seed goes where?</text:span></text:p>
          <draw:enhanced-geometry svg:viewBox="0 0 21600 21600" draw:type="rectangle" draw:enhanced-path="M 0 0 L 21600 0 21600 21600 0 21600 0 0 Z N"/>
        </draw:custom-shape>
        <draw:connector draw:style-name="gr16" draw:text-style-name="P1" draw:layer="layout" draw:type="curve" svg:x1="33.282cm" svg:y1="48.307cm" svg:x2="24.812cm" svg:y2="52.434cm" draw:start-shape="id17" draw:start-glue-point="2" draw:end-shape="id16" draw:end-glue-point="1" svg:d="M33282 48307c0 2752-2823 4127-8470 4127" svg:viewBox="0 0 8471 4128">
          <text:p/>
        </draw:connector>
        <draw:connector draw:style-name="gr16" draw:text-style-name="P1" draw:layer="layout" draw:type="curve" svg:x1="67.531cm" svg:y1="87.201cm" svg:x2="61.956cm" svg:y2="77.834cm" draw:start-shape="id12" draw:start-glue-point="3" draw:end-shape="id9" draw:end-glue-point="4" svg:d="M67531 87201c-3717 0-5575-3122-5575-9367" svg:viewBox="0 0 5576 9368">
          <text:p/>
        </draw:connector>
        <draw:connector draw:style-name="gr16" draw:text-style-name="P1" draw:layer="layout" draw:type="curve" svg:x1="88.406cm" svg:y1="84.506cm" svg:x2="85.312cm" svg:y2="87.201cm" draw:start-shape="id18" draw:start-glue-point="3" draw:end-shape="id12" draw:end-glue-point="1" svg:d="M88406 84506c-2320 0-774 2695-3094 2695" svg:viewBox="0 0 3095 2696">
          <text:p/>
        </draw:connector>
        <draw:frame draw:style-name="gr3" draw:layer="layout" svg:width="26.887cm" svg:height="13.52cm" svg:x="90.022cm" svg:y="116.397cm">
          <table:table table:template-name="default" table:use-first-row-styles="true" table:use-banding-rows-styles="true">
            <table:table-column table:style-name="co5"/>
            <table:table-column table:style-name="co5"/>
            <table:table-column table:style-name="co5"/>
            <table:table-column table:style-name="co6"/>
            <table:table-row table:style-name="ro4" table:default-cell-style-name="bg-none">
              <table:table-cell>
                <text:p><text:span text:style-name="T1">Matthew 5:14-16</text:span></text:p>
                <text:p><text:span text:style-name="T2">14 </text:span><text:span text:style-name="T3">Ye are the light of the world. A city that is set on an hill cannot be hid.</text:span></text:p>
                <text:p><text:span text:style-name="T2">15 </text:span><text:span text:style-name="T3">Neither do men light a candle, and put it under a bushel, but on a candlestick; and it giveth light unto all that are in the house.</text:span></text:p>
                <text:p><text:span text:style-name="T2">16 </text:span><text:span text:style-name="T3">Let your light so shine before men, that they may see your good works, and glorify your Father which is in heaven.</text:span></text:p>
              </table:table-cell>
              <table:table-cell>
                <text:p><text:span text:style-name="T1">Mark 4:21-25</text:span></text:p>
                <text:p><text:span text:style-name="T2">21 And he said unto them, </text:span><text:span text:style-name="T3">Is a candle brought to be put under a bushel, or under a bed? and not to be set on a candlestick?</text:span></text:p>
                <text:p><text:span text:style-name="T2">22 </text:span><text:span text:style-name="T3">For there is nothing hid, which shall not be manifested; neither was any thing kept secret, but that it should come abroad.</text:span></text:p>
                <text:p><text:span text:style-name="T2">23 </text:span><text:span text:style-name="T3">If any man have ears to hear, let him hear.</text:span></text:p>
                <text:p><text:span text:style-name="T2">24 And he said unto them, </text:span><text:span text:style-name="T3">Take heed what ye hear: with what measure ye mete, it shall be measured to you: and unto you that hear shall more be given.</text:span></text:p>
                <text:p><text:span text:style-name="T2">25 </text:span><text:span text:style-name="T3">For he that hath, to him shall be given: and he that hath not, from him shall be taken even that which he hath.</text:span></text:p>
              </table:table-cell>
              <table:table-cell>
                <text:p><text:span text:style-name="T1">Luke 8:16-18</text:span></text:p>
                <text:p><text:span text:style-name="T2">16 </text:span><text:span text:style-name="T3">No man, when he hath lighted a candle, covereth it with a vessel, or putteth it under a bed; but setteth it on a candlestick, that they which enter in may see the light.</text:span></text:p>
                <text:p><text:span text:style-name="T2">17 </text:span><text:span text:style-name="T3">For nothing is secret, that shall not be made manifest; neither any thing hid, that shall not be known and come abroad.</text:span></text:p>
                <text:p><text:span text:style-name="T2">18 </text:span><text:span text:style-name="T3">Take heed therefore how ye hear: for whosoever hath, to him shall be given; and whosoever hath not, from him shall be taken even that which he seemeth to have.</text:span></text:p>
              </table:table-cell>
              <table:table-cell>
                <text:p><text:span text:style-name="T1">Luke 11:33-36</text:span></text:p>
                <text:p><text:span text:style-name="T2">33 </text:span><text:span text:style-name="T3">No man, when he hath lighted a candle, putteth it in a secret place, neither under a bushel, but on a candlestick, that they which come in may see the light.</text:span></text:p>
                <text:p><text:span text:style-name="T2">34 </text:span><text:span text:style-name="T3">The light of the body is the eye: therefore when thine eye is single, thy whole body also is full of light; but when thine eye is evil, thy body also is full of darkness.</text:span></text:p>
                <text:p><text:span text:style-name="T2">35 </text:span><text:span text:style-name="T3">Take heed therefore that the light which is in thee be not darkness.</text:span></text:p>
                <text:p><text:span text:style-name="T2">36 </text:span><text:span text:style-name="T3">If thy whole body therefore be full of light, having no part dark, the whole shall be full of light, as when the bright shining of a candle doth give thee light.</text:span></text:p>
              </table:table-cell>
            </table:table-row>
          </table:table>
          <draw:image xlink:href="Pictures/TablePreview3.svm" xlink:type="simple" xlink:show="embed" xlink:actuate="onLoad"/>
        </draw:frame>
        <draw:connector draw:style-name="gr16" draw:text-style-name="P1" draw:layer="layout" draw:type="curve" svg:x1="125.142cm" svg:y1="110.855cm" svg:x2="127.365cm" svg:y2="109.902cm" draw:start-shape="id19" draw:start-glue-point="1" draw:end-shape="id20" draw:end-glue-point="3" svg:d="M125142 110855c1668 0 557-953 2223-953" svg:viewBox="0 0 2224 954">
          <text:p/>
        </draw:connector>
        <draw:custom-shape draw:style-name="gr35" draw:text-style-name="P12" xml:id="id22" draw:id="id22" draw:layer="layout" svg:width="10.447cm" svg:height="2.344cm" svg:x="130.234cm" svg:y="79.843cm">
          <text:list text:style-name="L1">
            <text:list-item>
              <text:p text:style-name="P15"><text:span text:style-name="T21">The children are the children of Israel.</text:span></text:p>
            </text:list-item>
            <text:list-item>
              <text:p text:style-name="P15"><text:span text:style-name="T21">The bread is Jesus (</text:span><text:span text:style-name="T20">John 6:33,35,48,51</text:span><text:span text:style-name="T21">).</text:span></text:p>
            </text:list-item>
            <text:list-item>
              <text:p text:style-name="P15"><text:span text:style-name="T21">The dogs are Greeks and Gentiles (</text:span><text:span text:style-name="T20">Romans 1:16, 2:10</text:span><text:span text:style-name="T21">)</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35.461cm" svg:y1="79.105cm" svg:x2="135.457cm" svg:y2="79.843cm" draw:start-shape="id21" draw:start-glue-point="2" draw:end-shape="id22" draw:end-glue-point="0" svg:d="M135461 79105c0 553-4 185-4 738" svg:viewBox="0 0 5 739">
          <text:p/>
        </draw:connector>
        <draw:frame draw:style-name="gr3" draw:layer="layout" svg:width="36.12cm" svg:height="31.484cm" svg:x="127.439cm" svg:y="28.497cm">
          <table:table table:template-name="default" table:use-first-row-styles="true" table:use-banding-rows-styles="true">
            <table:table-column table:style-name="co7"/>
            <table:table-column table:style-name="co7"/>
            <table:table-column table:style-name="co8"/>
            <table:table-row table:style-name="ro5" table:default-cell-style-name="bg-none">
              <table:table-cell>
                <text:p><text:span text:style-name="T9">Matthew 21:33-44</text:span></text:p>
                <text:p>33 Hear another parable: There was a certain householder, which planted a vineyard, and hedged it round about, and digged a winepress in it, and built a tower, and let it out to husbandmen, and went into a far country:</text:p>
                <text:p>34 And when the time of the fruit drew near, he sent his servants to the husbandmen, that they might receive the fruits of it.</text:p>
                <text:p>35 And the husbandmen took his servants, and beat one, and killed another, and stoned another.</text:p>
                <text:p>36 Again, he sent other servants more than the first: and they did unto them likewise.</text:p>
                <text:p>37 But last of all he sent unto them his son, saying, They will reverence my son.</text:p>
                <text:p>38 But when the husbandmen saw the son, they said among themselves, This is the heir; come, let us kill him, and let us seize on his inheritance.</text:p>
                <text:p>39 And they caught him, and cast him out of the vineyard, and slew him.</text:p>
                <text:p>40 When the lord therefore of the vineyard cometh, what will he do unto those husbandmen?</text:p>
                <text:p>41 They say unto him, He will miserably destroy those wicked men, and will let out his vineyard unto other husbandmen, which shall render him the fruits in their seasons.</text:p>
                <text:p>42 Jesus saith unto them, Did ye never read in the scriptures, The stone which the builders rejected, the same is become the head of the corner: this is the Lord's doing, and it is marvellous in our eyes?</text:p>
                <text:p>43 Therefore say I unto you, The kingdom of God shall be taken from you, and given to a nation bringing forth the fruits thereof.</text:p>
                <text:p>44 And whosoever shall fall on this stone shall be broken: but on whomsoever it shall fall, it will grind him to powder.</text:p>
              </table:table-cell>
              <table:table-cell>
                <text:p><text:span text:style-name="T9">Mark 12:1-11</text:span></text:p>
                <text:p>1 And he began to speak unto them by parables. A certain man planted a vineyard, and set an hedge about it, and digged a place for the winefat, and built a tower, and let it out to husbandmen, and went into a far country.</text:p>
                <text:p>2 And at the season he sent to the husbandmen a servant, that he might receive from the husbandmen of the fruit of the vineyard.</text:p>
                <text:p>3 And they caught him, and beat him, and sent him away empty.</text:p>
                <text:p>4 And again he sent unto them another servant; and at him they cast stones, and wounded him in the head, and sent him away shamefully handled.</text:p>
                <text:p>5 And again he sent another; and him they killed, and many others; beating some, and killing some.</text:p>
                <text:p>6 Having yet therefore one son, his wellbeloved, he sent him also last unto them, saying, They will reverence my son.</text:p>
                <text:p>7 But those husbandmen said among themselves, This is the heir; come, let us kill him, and the inheritance shall be ours.</text:p>
                <text:p>8 And they took him, and killed him, and cast him out of the vineyard.</text:p>
                <text:p>9 What shall therefore the lord of the vineyard do? he will come and destroy the husbandmen, and will give the vineyard unto others.</text:p>
                <text:p>10 And have ye not read this scripture; The stone which the builders rejected is become the head of the corner:</text:p>
                <text:p>11 This was the Lord's doing, and it is marvellous in our eyes?</text:p>
              </table:table-cell>
              <table:table-cell>
                <text:p><text:span text:style-name="T9">Luke 20:9-18</text:span></text:p>
                <text:p>9 Then began he to speak to the people this parable; A certain man planted a vineyard, and let it forth to husbandmen, and went into a far country for a long time.</text:p>
                <text:p>10 And at the season he sent a servant to the husbandmen, that they should give him of the fruit of the vineyard: but the husbandmen beat him, and sent him away empty.</text:p>
                <text:p>11 And again he sent another servant: and they beat him also, and entreated him shamefully, and sent him away empty.</text:p>
                <text:p>12 And again he sent a third: and they wounded him also, and cast him out.</text:p>
                <text:p>13 Then said the lord of the vineyard, What shall I do? I will send my beloved son: it may be they will reverence him when they see him.</text:p>
                <text:p>14 But when the husbandmen saw him, they reasoned among themselves, saying, This is the heir: come, let us kill him, that the inheritance may be ours.</text:p>
                <text:p>15 So they cast him out of the vineyard, and killed him. What therefore shall the lord of the vineyard do unto them?</text:p>
                <text:p>16 He shall come and destroy these husbandmen, and shall give the vineyard to others. And when they heard it, they said, God forbid.</text:p>
                <text:p>17 And he beheld them, and said, What is this then that is written, The stone which the builders rejected, the same is become the head of the corner?</text:p>
                <text:p>18 Whosoever shall fall upon that stone shall be broken; but on whomsoever it shall fall, it will grind him to powder.</text:p>
              </table:table-cell>
            </table:table-row>
          </table:table>
          <draw:image xlink:href="Pictures/TablePreview4.svm" xlink:type="simple" xlink:show="embed" xlink:actuate="onLoad"/>
        </draw:frame>
        <draw:frame draw:style-name="gr3" draw:layer="layout" svg:width="25.022cm" svg:height="8.021cm" svg:x="143.01cm" svg:y="53.523cm">
          <table:table table:template-name="default" table:use-first-row-styles="true" table:use-banding-rows-styles="true">
            <table:table-column table:style-name="co9"/>
            <table:table-column table:style-name="co10"/>
            <table:table-column table:style-name="co10"/>
            <table:table-row table:style-name="ro6" table:default-cell-style-name="bg-none">
              <table:table-cell>
                <text:p text:style-name="P20"><text:span text:style-name="T20">Matthew 24:32-33</text:span></text:p>
                <text:p text:style-name="P20"><text:span text:style-name="T21">32 </text:span><text:span text:style-name="T28">Now learn a parable of the fig tree; When his branch is yet tender, and putteth forth leaves, ye know that summer is nigh:</text:span></text:p>
                <text:p><text:span text:style-name="T21">33 </text:span><text:span text:style-name="T28">So likewise ye, when ye shall see all </text:span><text:span text:style-name="T29">these things</text:span><text:span text:style-name="T36">Matthew 24:4-31</text:span><text:span text:style-name="T28">, know that it is near, even at the doors.</text:span></text:p>
              </table:table-cell>
              <table:table-cell>
                <text:p><text:span text:style-name="T9">Mark 13:28-29</text:span></text:p>
                <text:p>28 <text:span text:style-name="T11">Now learn a parable of the fig tree; When her branch is yet tender, and putteth forth leaves, ye know that summer is near:</text:span></text:p>
                <text:p>29 <text:span text:style-name="T11">So ye in like manner, when ye shall see </text:span><text:span text:style-name="T13">these things</text:span><text:span text:style-name="T37">Mark 13:5-27</text:span><text:span text:style-name="T11"> come to pass, know that it is nigh, even at the doors.</text:span></text:p>
              </table:table-cell>
              <table:table-cell table:style-name="ce2">
                <text:p text:style-name="P21"><text:span text:style-name="T1">Luke 21:29-31</text:span></text:p>
                <text:p text:style-name="P21"><text:span text:style-name="T2">29 And he spake to them a parable; </text:span><text:span text:style-name="T3">Behold the fig tree, and all the trees;</text:span></text:p>
                <text:p text:style-name="P21"><text:span text:style-name="T2">30 </text:span><text:span text:style-name="T3">When they now shoot forth, ye see and know of your own selves that summer is now nigh at hand.</text:span></text:p>
                <text:p text:style-name="P21"><text:span text:style-name="T2">31 </text:span><text:span text:style-name="T3">So likewise ye, when ye see </text:span><text:span text:style-name="T4">these things</text:span><text:span text:style-name="T38">Luke 21:8-28</text:span><text:span text:style-name="T3"> come to pass, know ye that the kingdom of God is nigh at hand.</text:span></text:p>
              </table:table-cell>
            </table:table-row>
          </table:table>
          <draw:image xlink:href="Pictures/TablePreview5.svm" xlink:type="simple" xlink:show="embed" xlink:actuate="onLoad"/>
        </draw:frame>
        <draw:frame draw:style-name="gr3" draw:layer="layout" svg:width="21.148cm" svg:height="18.686cm" svg:x="148.426cm" svg:y="102.082cm">
          <table:table table:template-name="default" table:use-first-row-styles="true" table:use-banding-rows-styles="true">
            <table:table-column table:style-name="co11"/>
            <table:table-column table:style-name="co12"/>
            <table:table-column table:style-name="co12"/>
            <table:table-row table:style-name="ro7" table:default-cell-style-name="bg-none">
              <table:table-cell>
                <text:p><text:span text:style-name="T9">Matthew 9:16-17</text:span></text:p>
                <text:p>16 <text:span text:style-name="T11">No man putteth a piece of new cloth unto an old garment, for that which is put in to fill it up taketh from the garment, and the rent is made worse.</text:span></text:p>
                <text:p>17 <text:span text:style-name="T11">Neither do men put new wine into old bottles: else the bottles break, and the wine runneth out, and the bottles perish: but they put new wine into new bottles, and both are preserved.</text:span></text:p>
              </table:table-cell>
              <table:table-cell>
                <text:p><text:span text:style-name="T9">Mark 2:21-22</text:span></text:p>
                <text:p>21 <text:span text:style-name="T11">No man also seweth a piece of new cloth on an old garment: else the new piece that filled it up taketh away from the old, and the rent is made worse.</text:span></text:p>
                <text:p>22 <text:span text:style-name="T11">And no man putteth new wine into old bottles: else the new wine doth burst the bottles, and the wine is spilled, and the bottles will be marred: but new wine must be put into new bottles.</text:span></text:p>
              </table:table-cell>
              <table:table-cell>
                <text:p><text:span text:style-name="T9">Luke 5:36-39</text:span></text:p>
                <text:p>36 <text:span text:style-name="T11">And he spake also a parable unto them; No man putteth a piece of a new garment upon an old; if otherwise, then both the new maketh a rent, and the piece that was taken out of the new agreeth not with the old.</text:span></text:p>
                <text:p>37 <text:span text:style-name="T11">And no man putteth new wine into old bottles; else the new wine will burst the bottles, and be spilled, and the bottles shall perish.</text:span></text:p>
                <text:p>38 <text:span text:style-name="T11">But new wine must be put into new bottles; and both are preserved.</text:span></text:p>
                <text:p>39 <text:span text:style-name="T11">No man also having drunk old wine straightway desireth new: for he saith, The old is better.</text:span></text:p>
              </table:table-cell>
            </table:table-row>
          </table:table>
          <draw:image xlink:href="Pictures/TablePreview6.svm" xlink:type="simple" xlink:show="embed" xlink:actuate="onLoad"/>
        </draw:frame>
        <draw:frame draw:style-name="gr3" draw:layer="layout" svg:width="21.958cm" svg:height="10.865cm" svg:x="149.974cm" svg:y="89.424cm">
          <table:table table:template-name="default" table:use-first-row-styles="true" table:use-banding-rows-styles="true">
            <table:table-column table:style-name="co13"/>
            <table:table-column table:style-name="co13"/>
            <table:table-column table:style-name="co14"/>
            <table:table-row table:style-name="ro8" table:default-cell-style-name="bg-none">
              <table:table-cell>
                <text:p><text:span text:style-name="T9">Matthew 9:15</text:span></text:p>
                <text:p>And Jesus said unto them, <text:span text:style-name="T11">Can the children of the bridechamber mourn, as long as the bridegroom is with them? but the days will come, when the bridegroom shall be taken from them, and then shall they fast.</text:span></text:p>
              </table:table-cell>
              <table:table-cell>
                <text:p><text:span text:style-name="T9">Mark 2:19-20</text:span></text:p>
                <text:p>19 And Jesus said unto them, <text:span text:style-name="T11">Can the children of the bridechamber fast, while the bridegroom is with them? as long as they have the bridegroom with them, they cannot fast.</text:span></text:p>
                <text:p>20 <text:span text:style-name="T11">But the days will come, when the bridegroom shall be taken away from them, and then shall they fast in those days.</text:span></text:p>
              </table:table-cell>
              <table:table-cell>
                <text:p><text:span text:style-name="T9">Luke 5:34-35</text:span></text:p>
                <text:p>34 And he said unto them, <text:span text:style-name="T11">Can ye make the children of the bridechamber fast, while the bridegroom is with them?</text:span></text:p>
                <text:p>35 <text:span text:style-name="T11">But the days will come, when the bridegroom shall be taken away from them, and then shall they fast in those days.</text:span></text:p>
              </table:table-cell>
            </table:table-row>
          </table:table>
          <draw:image xlink:href="Pictures/TablePreview7.svm" xlink:type="simple" xlink:show="embed" xlink:actuate="onLoad"/>
        </draw:frame>
        <draw:frame draw:style-name="gr3" draw:layer="layout" svg:width="14.098cm" svg:height="4.466cm" svg:x="139.715cm" svg:y="66.516cm">
          <table:table table:template-name="default" table:use-first-row-styles="true" table:use-banding-rows-styles="true">
            <table:table-column table:style-name="co11"/>
            <table:table-column table:style-name="co12"/>
            <table:table-row table:style-name="ro9" table:default-cell-style-name="bg-none">
              <table:table-cell>
                <text:p><text:span text:style-name="T9">Luke 6:39</text:span></text:p>
                <text:p>And he spake a parable unto them, <text:span text:style-name="T11">Can the blind lead the blind? shall they not both fall into the ditch?</text:span></text:p>
              </table:table-cell>
              <table:table-cell>
                <text:p text:style-name="P20"><text:span text:style-name="T20">Luke 6:39</text:span></text:p>
                <text:p text:style-name="P20"><text:span text:style-name="T23">And he spake a parable unto them, </text:span><text:span text:style-name="T28">Can the blind lead the blind? shall they not both fall into the ditch?</text:span></text:p>
              </table:table-cell>
            </table:table-row>
          </table:table>
          <draw:image xlink:href="Pictures/TablePreview8.svm" xlink:type="simple" xlink:show="embed" xlink:actuate="onLoad"/>
        </draw:frame>
        <draw:frame draw:style-name="gr3" draw:layer="layout" svg:width="15.805cm" svg:height="12.287cm" svg:x="172.201cm" svg:y="52.7cm">
          <table:table table:template-name="default" table:use-first-row-styles="true" table:use-banding-rows-styles="true">
            <table:table-column table:style-name="co15"/>
            <table:table-column table:style-name="co16"/>
            <table:table-row table:style-name="ro10" table:default-cell-style-name="bg-none">
              <table:table-cell>
                <text:p><text:span text:style-name="T9">Matthew 7:3-5</text:span></text:p>
                <text:p>3 <text:span text:style-name="T11">And why beholdest thou the mote that is in thy brother's eye, but considerest not the beam that is in thine own eye?</text:span></text:p>
                <text:p>4 <text:span text:style-name="T11">Or how wilt thou say to thy brother, Let me pull out the mote out of thine eye; and, behold, a beam is in thine own eye?</text:span></text:p>
                <text:p>5 <text:span text:style-name="T11">Thou hypocrite, first cast out the beam out of thine own eye; and then shalt thou see clearly to cast out the mote out of thy brother's eye.</text:span></text:p>
              </table:table-cell>
              <table:table-cell>
                <text:p text:style-name="P20"><text:span text:style-name="T20">Luke 6:41-42</text:span></text:p>
                <text:p text:style-name="P20"><text:span text:style-name="T23">41 </text:span><text:span text:style-name="T28">And why beholdest thou the mote that is in thy brother's eye, but perceivest not the beam that is in thine own eye?</text:span></text:p>
                <text:p text:style-name="P20"><text:span text:style-name="T23">42 </text:span><text:span text:style-name="T28">Either how canst thou say to thy brother, Brother, let me pull out the mote that is in thine eye, when thou thyself beholdest not the beam that is in thine own eye? Thou hypocrite, cast out first the beam out of thine own eye, and then shalt thou see clearly to pull out the mote that is in thy brother's eye.</text:span></text:p>
              </table:table-cell>
            </table:table-row>
          </table:table>
          <draw:image xlink:href="Pictures/TablePreview9.svm" xlink:type="simple" xlink:show="embed" xlink:actuate="onLoad"/>
        </draw:frame>
        <draw:connector draw:style-name="gr16" draw:text-style-name="P1" draw:layer="layout" draw:type="curve" svg:x1="84.344cm" svg:y1="49.577cm" svg:x2="81.949cm" svg:y2="59.676cm" draw:start-shape="id23" draw:start-glue-point="2" draw:end-shape="id3" draw:end-glue-point="1" svg:d="M84344 49577c0 6733-798 10099-2395 10099" svg:viewBox="0 0 2396 10100">
          <text:p/>
        </draw:connector>
        <draw:frame draw:style-name="gr3" draw:layer="layout" svg:width="14.098cm" svg:height="6.86cm" svg:x="121.696cm" svg:y="139.441cm">
          <table:table table:template-name="default" table:use-first-row-styles="true" table:use-banding-rows-styles="true">
            <table:table-column table:style-name="co17"/>
            <table:table-column table:style-name="co17"/>
            <table:table-column table:style-name="co18"/>
            <table:table-row table:style-name="ro11" table:default-cell-style-name="bg-none">
              <table:table-cell>
                <text:p><text:span text:style-name="T2">Matthew 5:13</text:span></text:p>
                <text:p><text:span text:style-name="T2">Ye are the salt of the earth: but if the salt have lost his savour, wherewith shall it be salted? it is thenceforth good for nothing, but to be cast out, and to be trodden under foot of men.</text:span></text:p>
              </table:table-cell>
              <table:table-cell>
                <text:p><text:span text:style-name="T2">Mark 9:50</text:span></text:p>
                <text:p><text:span text:style-name="T2">Salt is good: but if the salt have lost his saltness, wherewith will ye season it? Have salt in yourselves, and have peace one with another.</text:span></text:p>
              </table:table-cell>
              <table:table-cell>
                <text:p><text:span text:style-name="T2">Luk 14:34-35</text:span></text:p>
                <text:p><text:span text:style-name="T2">34 Salt is good: but if the salt have lost his savour, wherewith shall it be seasoned?</text:span></text:p>
                <text:p><text:span text:style-name="T2">35 It is neither fit for the land, nor yet for the dunghill; but men cast it out. He that hath ears to hear, let him hear.</text:span></text:p>
              </table:table-cell>
            </table:table-row>
          </table:table>
          <draw:image xlink:href="Pictures/TablePreview10.svm"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14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cm" fo:line-height="100%" style:text-autospace="none"/>
      <style:text-properties fo:font-size="14pt"/>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ucida Sans" style:font-family-complex="'Lucida Sans'" style:font-family-generic-complex="swiss"/>
    </style:style>
    <style:style style:name="List" style:family="graphic">
      <style:paragraph-properties style:text-autospace="none"/>
      <style:text-properties fo:font-size="14pt" style:font-name-complex="Lucida Sans" style:font-family-complex="'Lucida Sans'" style:font-family-generic-complex="swiss"/>
    </style:style>
    <style:style style:name="Normal" style:family="graphic">
      <style:graphic-properties style:writing-mode="lr-tb"/>
      <style:paragraph-properties style:text-autospace="none"/>
      <style:text-properties style:use-window-font-color="true" loext:opacity="0%" style:font-name="Liberation Sans" fo:font-family="'Liberation Sans', Arial" style:font-family-generic="swiss" style:font-pitch="variable" fo:font-size="12pt" fo:language="en" fo:country="US" style:letter-kerning="true" style:font-name-asian="Segoe UI" style:font-family-asian="'Segoe UI'" style:font-family-generic-asian="roman" style:font-pitch-asian="variable" style:language-asian="zh" style:country-asian="CN" style:font-name-complex="Liberation Sans" style:font-family-complex="'Liberation Sans', Arial" style:font-family-generic-complex="swiss" style:font-pitch-complex="variable" style:font-size-complex="12pt" style:language-complex="en" style:country-complex="US"/>
    </style:style>
    <style:style style:name="Table_20_Contents" style:display-name="Table Contents" style:family="graphic">
      <style:paragraph-properties style:text-autospace="none"/>
      <style:text-properties fo:font-size="14pt"/>
    </style:style>
    <style:style style:name="Table_20_Heading" style:display-name="Table Heading" style:family="graphic">
      <style:paragraph-properties fo:text-align="center" style:text-autospace="none"/>
      <style:text-properties fo:font-size="14pt" fo:font-weight="bold" style:font-weight-asian="bold" style:font-weight-complex="bold"/>
    </style:style>
    <style:style style:name="caption" style:family="graphic">
      <style:paragraph-properties fo:margin-top="0.374cm" fo:margin-bottom="0.374cm" style:text-autospace="none"/>
      <style:text-properties fo:font-size="14pt" fo:font-style="italic" style:font-size-asian="12pt" style:font-style-asian="italic" style:font-name-complex="Lucida Sans" style:font-family-complex="'Lucida Sans'" style:font-family-generic-complex="swiss" style:font-size-complex="12pt" style:font-style-complex="italic"/>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William K. McDannell Jr.</meta:initial-creator>
    <meta:creation-date>2025-11-26T16:19:34.930172700</meta:creation-date>
    <dc:date>2026-07-11T12:20:57.552125080</dc:date>
    <meta:editing-duration>PT16H6M6S</meta:editing-duration>
    <meta:editing-cycles>141</meta:editing-cycles>
    <meta:generator>LibreOffice/26.2.4.2$Linux_X86_64 LibreOffice_project/64a984c51f4702dbd3710b13428c673a2f1292e7</meta:generator>
    <meta:document-statistic meta:object-count="125"/>
  </office:meta>
</office:document-meta>
</file>