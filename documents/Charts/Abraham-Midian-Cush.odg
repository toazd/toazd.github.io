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184cm" fo:min-width="1.994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1.173cm" fo:min-width="2.16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71cm" fo:min-width="2.006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173cm" fo:min-width="1.996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-color="#ffd7d7"/>
      <style:paragraph-properties fo:text-align="center" style:writing-mode="lr-tb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2" draw:id="id2" draw:layer="layout" svg:width="2.648cm" svg:height="1.588cm" svg:x="8.067cm" svg:y="4.158cm">
            <text:p text:style-name="P1"><text:span text:style-name="T1">Shem</text:span></text:p>
            <text:p text:style-name="P1"><text:span text:style-name="T2">Gen 10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3" xml:id="id7" draw:id="id7" draw:layer="layout" svg:width="2.818cm" svg:height="1.575cm" svg:x="4.774cm" svg:y="8.439cm">
            <text:p text:style-name="P1"><text:span text:style-name="T3">Sarai/Sarah</text:span></text:p>
            <text:p text:style-name="P1"><text:span text:style-name="T2">Gen 11: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" draw:text-style-name="P2" xml:id="id1" draw:id="id1" draw:layer="layout" svg:width="2.648cm" svg:height="1.463cm" svg:x="11.164cm" svg:y="1.635cm">
            <text:p text:style-name="P1"><text:span text:style-name="T1">Noah</text:span></text:p>
            <text:p text:style-name="P1"><text:span text:style-name="T2">Gen 10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4" draw:layer="layout" draw:type="curve" svg:x1="12.488cm" svg:y1="3.098cm" svg:x2="9.391cm" svg:y2="4.158cm" draw:start-shape="id1" draw:start-glue-point="2" draw:end-shape="id2" draw:end-glue-point="0" svg:d="M12488 3098c0 795-3097 265-3097 1060" svg:viewBox="0 0 3098 1061">
            <text:p/>
          </draw:connector>
          <draw:custom-shape draw:style-name="gr2" draw:text-style-name="P2" xml:id="id3" draw:id="id3" draw:layer="layout" svg:width="2.648cm" svg:height="1.588cm" svg:x="11.168cm" svg:y="4.159cm">
            <text:p text:style-name="P1"><text:span text:style-name="T1">Ham</text:span></text:p>
            <text:p text:style-name="P1"><text:span text:style-name="T2">Gen 10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" draw:text-style-name="P2" xml:id="id4" draw:id="id4" draw:layer="layout" svg:width="2.648cm" svg:height="1.588cm" svg:x="14.169cm" svg:y="4.16cm">
            <text:p text:style-name="P1"><text:span text:style-name="T1">Japheth</text:span></text:p>
            <text:p text:style-name="P1"><text:span text:style-name="T2">Gen 10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4" draw:layer="layout" draw:type="curve" svg:x1="12.488cm" svg:y1="3.098cm" svg:x2="12.492cm" svg:y2="4.159cm" draw:start-shape="id1" draw:start-glue-point="2" draw:end-shape="id3" draw:end-glue-point="0" svg:d="M12488 3098c0 796 4 266 4 1061" svg:viewBox="0 0 5 1062">
            <text:p/>
          </draw:connector>
          <draw:connector draw:style-name="gr5" draw:text-style-name="P4" draw:layer="layout" draw:type="curve" svg:x1="12.488cm" svg:y1="3.098cm" svg:x2="15.493cm" svg:y2="4.16cm" draw:start-shape="id1" draw:start-glue-point="2" draw:end-shape="id4" draw:end-glue-point="0" svg:d="M12488 3098c0 796 3005 266 3005 1062" svg:viewBox="0 0 3006 1063">
            <text:p/>
          </draw:connector>
          <draw:custom-shape draw:style-name="gr2" draw:text-style-name="P2" xml:id="id5" draw:id="id5" draw:layer="layout" svg:width="2.648cm" svg:height="1.588cm" svg:x="11.169cm" svg:y="6.26cm">
            <text:p text:style-name="P1"><text:span text:style-name="T1">Cush</text:span></text:p>
            <text:p text:style-name="P1"><text:span text:style-name="T2">Gen 10: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4" draw:layer="layout" draw:type="curve" svg:x1="12.492cm" svg:y1="5.747cm" svg:x2="12.493cm" svg:y2="6.26cm" draw:start-shape="id3" draw:start-glue-point="2" draw:end-shape="id5" draw:end-glue-point="0" svg:d="M12492 5747c0 385 1 129 1 513" svg:viewBox="0 0 2 514">
            <text:p/>
          </draw:connector>
          <draw:custom-shape draw:style-name="gr6" draw:text-style-name="P2" xml:id="id6" draw:id="id6" draw:layer="layout" svg:width="2.648cm" svg:height="1.575cm" svg:x="8.059cm" svg:y="8.437cm">
            <text:p text:style-name="P1"><text:span text:style-name="T1">Abram/Abraham</text:span></text:p>
            <text:p text:style-name="P1"><text:span text:style-name="T2">Gen 11: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4" draw:layer="layout" draw:type="curve" svg:x1="9.391cm" svg:y1="5.746cm" svg:x2="9.383cm" svg:y2="8.437cm" draw:start-shape="id2" draw:start-glue-point="2" draw:end-shape="id6" draw:end-glue-point="0" svg:d="M9391 5746c0 2019-8 674-8 2691" svg:viewBox="0 0 9 2692">
            <text:p/>
          </draw:connector>
          <draw:custom-shape draw:style-name="gr3" draw:text-style-name="P3" xml:id="id8" draw:id="id8" draw:layer="layout" svg:width="2.818cm" svg:height="1.575cm" svg:x="11.141cm" svg:y="8.439cm">
            <text:p text:style-name="P1"><text:span text:style-name="T3">Keturah</text:span></text:p>
            <text:p text:style-name="P1"><text:span text:style-name="T2">Gen 25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4" xml:id="id9" draw:id="id9" draw:layer="layout" draw:type="curve" svg:x1="8.059cm" svg:y1="9.224cm" svg:x2="7.592cm" svg:y2="9.226cm" draw:start-shape="id6" draw:start-glue-point="3" draw:end-shape="id7" draw:end-glue-point="1" svg:d="M8059 9224c-349 0-116 2-467 2" svg:viewBox="0 0 468 3">
            <text:p/>
          </draw:connector>
          <draw:connector draw:style-name="gr5" draw:text-style-name="P4" xml:id="id11" draw:id="id11" draw:layer="layout" draw:type="curve" svg:x1="10.707cm" svg:y1="9.224cm" svg:x2="11.141cm" svg:y2="9.226cm" draw:start-shape="id6" draw:start-glue-point="1" draw:end-shape="id8" draw:end-glue-point="3" svg:d="M10707 9224c327 0 110 2 434 2" svg:viewBox="0 0 435 3">
            <text:p/>
          </draw:connector>
          <draw:custom-shape draw:style-name="gr2" draw:text-style-name="P2" xml:id="id10" draw:id="id10" draw:layer="layout" svg:width="2.648cm" svg:height="1.588cm" svg:x="6.501cm" svg:y="10.396cm">
            <text:p text:style-name="P1"><text:span text:style-name="T1">Isaac</text:span></text:p>
            <text:p text:style-name="P1"><text:span text:style-name="T2">Gen 21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" draw:text-style-name="P2" xml:id="id12" draw:id="id12" draw:layer="layout" svg:width="2.648cm" svg:height="1.588cm" svg:x="9.606cm" svg:y="10.372cm">
            <text:p text:style-name="P1"><text:span text:style-name="T1">Midian</text:span></text:p>
            <text:p text:style-name="P1"><text:span text:style-name="T2">Gen 25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4" draw:layer="layout" draw:type="curve" svg:x1="7.826cm" svg:y1="9.225cm" svg:x2="7.825cm" svg:y2="10.396cm" draw:start-shape="id9" draw:start-glue-point="0" draw:end-shape="id10" draw:end-glue-point="0" svg:d="M7826 9225c0 892-1 307-1 1171" svg:viewBox="0 0 2 1172">
            <text:p/>
          </draw:connector>
          <draw:connector draw:style-name="gr5" draw:text-style-name="P4" draw:layer="layout" draw:type="curve" svg:x1="10.925cm" svg:y1="9.225cm" svg:x2="10.93cm" svg:y2="10.372cm" draw:start-shape="id11" draw:start-glue-point="0" draw:end-shape="id12" draw:end-glue-point="0" svg:d="M10925 9225c0 874 5 301 5 1147" svg:viewBox="0 0 6 1148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31:48.314909963</dc:date>
    <meta:editing-duration>PT7H26M18S</meta:editing-duration>
    <meta:editing-cycles>119</meta:editing-cycles>
    <meta:generator>LibreOffice/26.2.4.2$Linux_X86_64 LibreOffice_project/64a984c51f4702dbd3710b13428c673a2f1292e7</meta:generator>
    <meta:document-statistic meta:object-count="20"/>
  </office:meta>
</office:document-meta>
</file>