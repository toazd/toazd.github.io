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dp1" style:family="drawing-page">
      <style:drawing-page-properties draw:fill="solid" draw:fill-color="#ffffff"/>
    </style:style>
    <style:style style:name="gr1" style:family="graphic" style:parent-style-name="objectwithoutfill">
      <style:graphic-properties draw:stroke="dash" draw:stroke-dash="Long_20_Dash" svg:stroke-color="#3465a4" draw:marker-start="" draw:marker-end="" svg:stroke-linecap="butt" draw:fill="none" draw:textarea-horizontal-align="justify" draw:textarea-vertical-align="middle" loext:decorative="false"/>
    </style:style>
    <style:style style:name="gr2" style:family="graphic" style:parent-style-name="objectwithoutfill">
      <style:graphic-properties draw:stroke="dash" draw:stroke-dash="Long_20_Dash" svg:stroke-color="#3465a4" draw:marker-start="" draw:marker-end="" svg:stroke-linecap="butt" draw:fill="none" draw:textarea-horizontal-align="justify" draw:textarea-vertical-align="middle" loext:decorative="false"/>
      <style:paragraph-properties style:writing-mode="lr-tb"/>
    </style:style>
    <style:style style:name="gr3"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4" style:family="graphic" style:parent-style-name="objectwithoutfill">
      <style:graphic-properties draw:stroke="solid" draw:stroke-dash="Dash" svg:stroke-color="#127622" svg:stroke-linecap="butt" draw:fill="none" draw:textarea-vertical-align="middle" loext:decorative="false"/>
      <style:paragraph-properties style:writing-mode="lr-tb"/>
    </style:style>
    <style:style style:name="gr5" style:family="graphic" style:parent-style-name="objectwithoutfill">
      <style:graphic-properties draw:stroke="solid" draw:stroke-dash="Dash" svg:stroke-color="#729fcf" svg:stroke-linecap="butt" draw:fill="none" draw:textarea-vertical-align="middle" loext:decorative="false"/>
      <style:paragraph-properties style:writing-mode="lr-tb"/>
    </style:style>
    <style:style style:name="gr6"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7" style:family="graphic" style:parent-style-name="objectwithoutfill">
      <style:graphic-properties draw:stroke="dash" draw:stroke-dash="Long_20_Dash" svg:stroke-linecap="butt" draw:fill="none" draw:textarea-vertical-align="middle" loext:decorative="false"/>
      <style:paragraph-properties style:writing-mode="lr-tb"/>
    </style:style>
    <style:style style:name="gr8"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9"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0"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1"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2"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3"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4"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5"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6"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7"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8" style:family="graphic" style:parent-style-name="objectwithoutfill" style:list-style-name="L1">
      <style:graphic-properties draw:stroke="solid" draw:stroke-dash="Dash" svg:stroke-color="#800080" draw:marker-start="" draw:marker-end="" svg:stroke-linecap="butt" draw:fill="none" draw:textarea-horizontal-align="center" draw:textarea-vertical-align="middle" loext:decorative="false"/>
      <style:paragraph-properties style:writing-mode="lr-tb"/>
    </style:style>
    <style:style style:name="gr19" style:family="graphic" style:parent-style-name="objectwithoutfill">
      <style:graphic-properties draw:stroke="solid" draw:stroke-dash="Dash" svg:stroke-color="#800080" draw:marker-start="" draw:marker-end="" svg:stroke-linecap="butt" draw:fill="none" draw:textarea-horizontal-align="center" draw:textarea-vertical-align="middle" loext:decorative="false"/>
    </style:style>
    <style:style style:name="gr20"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1"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2"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3"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4"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5"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6"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7"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8"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9"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30"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1"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32"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3" style:family="graphic" style:parent-style-name="objectwithoutfill" style:list-style-name="L1">
      <style:graphic-properties draw:stroke="solid" draw:stroke-dash="Dash" svg:stroke-color="#800080" draw:marker-start="" draw:marker-end="" svg:stroke-linecap="butt" draw:fill="none" draw:textarea-horizontal-align="center" draw:textarea-vertical-align="middle" loext:decorative="false"/>
      <style:paragraph-properties style:writing-mode="lr-tb"/>
    </style:style>
    <style:style style:name="gr34"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5" style:family="graphic" style:parent-style-name="standard">
      <style:graphic-properties draw:fill-color="#fff5ce" draw:textarea-horizontal-align="justify" draw:textarea-vertical-align="middle" draw:auto-grow-height="true" fo:min-height="0cm" fo:min-width="0cm" style:writing-mode="lr-tb" loext:decorative="false"/>
      <style:paragraph-properties style:writing-mode="lr-tb"/>
    </style:style>
    <style:style style:name="P1" style:family="paragraph">
      <loext:graphic-properties draw:fill="none"/>
      <style:paragraph-properties fo:margin-left="0cm" fo:margin-right="0cm" fo:margin-top="0cm" fo:margin-bottom="0cm" fo:line-height="100%" fo:text-align="center" fo:text-indent="0cm"/>
      <style:text-properties fo:color="#000000" loext:opacity="100%" style:font-name="Liberation Sans" fo:font-size="6pt" style:font-size-asian="18pt" style:font-size-complex="18pt"/>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style:paragraph-properties fo:margin-left="0cm" fo:margin-right="0cm" fo:margin-top="0cm" fo:margin-bottom="0cm" fo:line-height="100%" fo:text-align="center" fo:text-indent="0cm"/>
      <style:text-properties fo:color="#000000" loext:opacity="100%" style:font-name="Ubuntu" fo:font-size="6pt" style:letter-kerning="true" style:font-name-asian="Noto Sans CJK SC" style:font-size-asian="4pt" style:font-name-complex="Noto Sans Devanagari" style:font-size-complex="4pt"/>
    </style:style>
    <style:style style:name="P4" style:family="paragraph">
      <style:paragraph-properties fo:text-align="center"/>
    </style:style>
    <style:style style:name="P5" style:family="paragraph">
      <loext:graphic-properties draw:fill="none"/>
      <style:paragraph-properties fo:text-align="center"/>
      <style:text-properties fo:color="#000000" loext:opacity="100%" style:font-name="Ubuntu" fo:font-size="6pt"/>
    </style:style>
    <style:style style:name="P6" style:family="paragraph">
      <loext:graphic-properties draw:fill="none"/>
      <style:text-properties fo:color="#000000" loext:opacity="100%" fo:font-size="6pt"/>
    </style:style>
    <style:style style:name="P7" style:family="paragraph">
      <style:paragraph-properties fo:margin-left="0cm" fo:margin-right="0cm" fo:text-align="center" fo:text-indent="0cm"/>
    </style:style>
    <style:style style:name="P8" style:family="paragraph">
      <loext:graphic-properties draw:fill="none"/>
      <style:paragraph-properties fo:margin-left="0cm" fo:margin-right="0cm" fo:text-align="center" fo:text-indent="0cm"/>
      <style:text-properties fo:color="#000000" loext:opacity="100%" style:font-name="Ubuntu" fo:font-size="6pt" style:letter-kerning="true" style:font-name-asian="Noto Sans CJK SC" style:font-size-asian="4pt" style:font-name-complex="Noto Sans Devanagari" style:font-size-complex="4pt"/>
    </style:style>
    <style:style style:name="P9" style:family="paragraph">
      <loext:graphic-properties draw:fill="none"/>
      <style:paragraph-properties fo:margin-left="0cm" fo:margin-right="0cm" fo:margin-top="0cm" fo:margin-bottom="0cm" fo:line-height="100%" fo:text-align="center" fo:text-indent="0cm"/>
      <style:text-properties fo:color="#000000" loext:opacity="100%" style:font-name="Ubuntu" fo:font-size="6pt" style:font-size-asian="4pt" style:font-size-complex="4pt"/>
    </style:style>
    <style:style style:name="P10" style:family="paragraph">
      <style:paragraph-properties fo:text-align="start"/>
      <style:text-properties fo:font-size="6pt" fo:background-color="#fff5ce"/>
    </style:style>
    <style:style style:name="P11" style:family="paragraph">
      <loext:graphic-properties draw:fill-color="#fff5ce"/>
      <style:paragraph-properties fo:text-align="start" style:writing-mode="lr-tb"/>
      <style:text-properties fo:font-size="6pt" fo:background-color="#fff5ce"/>
    </style:style>
    <style:style style:name="P12" style:family="paragraph">
      <style:paragraph-properties fo:text-align="center"/>
      <style:text-properties fo:font-size="6pt" fo:background-color="#fff5ce"/>
    </style:style>
    <style:style style:name="P13" style:family="paragraph">
      <loext:graphic-properties draw:fill-color="#fff5ce"/>
      <style:paragraph-properties fo:text-align="center" style:writing-mode="lr-tb"/>
      <style:text-properties fo:font-size="6pt" fo:background-color="#fff5ce"/>
    </style:style>
    <style:style style:name="T1" style:family="text">
      <style:text-properties fo:color="#000000" loext:opacity="100%" style:font-name="Liberation Sans" fo:font-size="6pt" style:font-size-asian="18pt" style:font-size-complex="18pt"/>
    </style:style>
    <style:style style:name="T2" style:family="text">
      <style:text-properties fo:color="#000000" loext:opacity="100%" style:font-name="Ubuntu" fo:font-size="6pt" style:letter-kerning="true" style:font-name-asian="Noto Sans CJK SC" style:font-size-asian="4pt" style:font-name-complex="Noto Sans Devanagari" style:font-size-complex="4pt"/>
    </style:style>
    <style:style style:name="T3" style:family="text">
      <style:text-properties fo:color="#000000" loext:opacity="100%" style:text-position="super 58%" style:font-name="Ubuntu" fo:font-size="6pt" style:letter-kerning="true" style:font-name-asian="Noto Sans CJK SC" style:font-size-asian="4pt" style:font-name-complex="Noto Sans Devanagari" style:font-size-complex="4pt"/>
    </style:style>
    <style:style style:name="T4" style:family="text">
      <style:text-properties fo:color="#000000" loext:opacity="100%" style:font-name="Ubuntu" fo:font-size="6pt"/>
    </style:style>
    <style:style style:name="T5" style:family="text">
      <style:text-properties fo:color="#000000" loext:opacity="100%" fo:font-size="6pt"/>
    </style:style>
    <style:style style:name="T6" style:family="text">
      <style:text-properties fo:font-size="6pt"/>
    </style:style>
    <style:style style:name="T7" style:family="text">
      <style:text-properties style:text-position="super 58%" fo:font-size="6pt"/>
    </style:style>
    <style:style style:name="T8" style:family="text">
      <style:text-properties fo:font-size="6pt" fo:background-color="#ffdbb6"/>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line draw:style-name="gr1" draw:text-style-name="P1" draw:layer="layout" svg:x1="11.704cm" svg:y1="1.272cm" svg:x2="14.624cm" svg:y2="1.271cm">
          <text:p/>
        </draw:line>
        <draw:line draw:style-name="gr1" draw:text-style-name="P1" draw:layer="layout" svg:x1="11.699cm" svg:y1="3.312cm" svg:x2="14.619cm" svg:y2="3.311cm">
          <text:p/>
        </draw:line>
        <draw:line draw:style-name="gr2" draw:text-style-name="P1" draw:layer="layout" svg:x1="11.699cm" svg:y1="1.534cm" svg:x2="14.619cm" svg:y2="1.533cm">
          <text:p text:style-name="P2"><text:span text:style-name="T1">1</text:span></text:p>
          <text:p text:style-name="P2"><text:span text:style-name="T1"/></text:p>
        </draw:line>
        <draw:line draw:style-name="gr3" draw:text-style-name="P3" draw:layer="layout" svg:x1="11.699cm" svg:y1="3.058cm" svg:x2="14.619cm" svg:y2="3.057cm">
          <text:p text:style-name="P2"><text:span text:style-name="T2">7 (1</text:span><text:span text:style-name="T3">st</text:span><text:span text:style-name="T2"> sabbath)</text:span></text:p>
          <text:p text:style-name="P2"><text:span text:style-name="T2">8</text:span></text:p>
        </draw:line>
        <draw:line draw:style-name="gr4" draw:text-style-name="P5" draw:layer="layout" svg:x1="11.703cm" svg:y1="13.971cm" svg:x2="11.703cm" svg:y2="1.271cm">
          <text:p text:style-name="P4"><text:span text:style-name="T4">50 years</text:span></text:p>
          <text:p text:style-name="P4"><text:span text:style-name="T4"/></text:p>
        </draw:line>
        <draw:line draw:style-name="gr5" draw:text-style-name="P5" draw:layer="layout" svg:x1="14.624cm" svg:y1="1.272cm" svg:x2="14.624cm" svg:y2="13.718cm">
          <text:p text:style-name="P4"><text:span text:style-name="T4">49 years</text:span></text:p>
          <text:p text:style-name="P4"><text:span text:style-name="T4"/></text:p>
        </draw:line>
        <draw:line draw:style-name="gr6" draw:text-style-name="P3" draw:layer="layout" svg:x1="11.699cm" svg:y1="4.836cm" svg:x2="14.619cm" svg:y2="4.835cm">
          <text:p text:style-name="P2"><text:span text:style-name="T2">14 (2</text:span><text:span text:style-name="T3">nd</text:span><text:span text:style-name="T2"> sabbath)</text:span></text:p>
          <text:p text:style-name="P2"><text:span text:style-name="T2">15</text:span></text:p>
        </draw:line>
        <draw:line draw:style-name="gr1" draw:text-style-name="P1" draw:layer="layout" svg:x1="11.699cm" svg:y1="5.09cm" svg:x2="14.619cm" svg:y2="5.089cm">
          <text:p/>
        </draw:line>
        <draw:line draw:style-name="gr7" draw:text-style-name="P6" draw:layer="layout" svg:x1="11.698cm" svg:y1="1.787cm" svg:x2="14.619cm" svg:y2="1.787cm">
          <text:p><text:span text:style-name="T5">2</text:span></text:p>
          <text:p><text:span text:style-name="T5"/></text:p>
        </draw:line>
        <draw:line draw:style-name="gr7" draw:text-style-name="P6" draw:layer="layout" svg:x1="11.699cm" svg:y1="2.041cm" svg:x2="14.62cm" svg:y2="2.041cm">
          <text:p><text:span text:style-name="T5">3</text:span></text:p>
          <text:p><text:span text:style-name="T5"/></text:p>
        </draw:line>
        <draw:line draw:style-name="gr7" draw:text-style-name="P6" draw:layer="layout" svg:x1="11.7cm" svg:y1="2.295cm" svg:x2="14.621cm" svg:y2="2.295cm">
          <text:p><text:span text:style-name="T5">4</text:span></text:p>
          <text:p><text:span text:style-name="T5"/></text:p>
        </draw:line>
        <draw:line draw:style-name="gr7" draw:text-style-name="P6" draw:layer="layout" svg:x1="11.701cm" svg:y1="2.549cm" svg:x2="14.622cm" svg:y2="2.549cm">
          <text:p><text:span text:style-name="T5">5</text:span></text:p>
          <text:p><text:span text:style-name="T5"/></text:p>
        </draw:line>
        <draw:line draw:style-name="gr8" draw:text-style-name="P8" draw:layer="layout" svg:x1="11.702cm" svg:y1="2.803cm" svg:x2="14.623cm" svg:y2="2.803cm">
          <text:p text:style-name="P7"><text:span text:style-name="T2">6</text:span></text:p>
          <text:p text:style-name="P7"><text:span text:style-name="T2"/></text:p>
        </draw:line>
        <draw:line draw:style-name="gr7" draw:text-style-name="P6" draw:layer="layout" svg:x1="11.699cm" svg:y1="3.566cm" svg:x2="14.62cm" svg:y2="3.566cm">
          <text:p><text:span text:style-name="T5">9</text:span></text:p>
          <text:p><text:span text:style-name="T5"/></text:p>
        </draw:line>
        <draw:line draw:style-name="gr7" draw:text-style-name="P6" draw:layer="layout" svg:x1="11.7cm" svg:y1="3.82cm" svg:x2="14.621cm" svg:y2="3.82cm">
          <text:p><text:span text:style-name="T5">10</text:span></text:p>
          <text:p><text:span text:style-name="T5"/></text:p>
        </draw:line>
        <draw:line draw:style-name="gr7" draw:text-style-name="P6" draw:layer="layout" svg:x1="11.701cm" svg:y1="4.074cm" svg:x2="14.622cm" svg:y2="4.074cm">
          <text:p><text:span text:style-name="T5">11</text:span></text:p>
          <text:p><text:span text:style-name="T5"/></text:p>
        </draw:line>
        <draw:line draw:style-name="gr7" draw:text-style-name="P6" draw:layer="layout" svg:x1="11.702cm" svg:y1="4.328cm" svg:x2="14.623cm" svg:y2="4.328cm">
          <text:p><text:span text:style-name="T5">12</text:span></text:p>
          <text:p><text:span text:style-name="T5"/></text:p>
        </draw:line>
        <draw:line draw:style-name="gr9" draw:text-style-name="P8" draw:layer="layout" svg:x1="11.703cm" svg:y1="4.582cm" svg:x2="14.624cm" svg:y2="4.582cm">
          <text:p text:style-name="P7"><text:span text:style-name="T2">13</text:span></text:p>
          <text:p text:style-name="P7"><text:span text:style-name="T2"/></text:p>
        </draw:line>
        <draw:line draw:style-name="gr10" draw:text-style-name="P3" draw:layer="layout" svg:x1="11.7cm" svg:y1="6.614cm" svg:x2="14.62cm" svg:y2="6.613cm">
          <text:p text:style-name="P2"><text:span text:style-name="T2">21 (3</text:span><text:span text:style-name="T3">rd</text:span><text:span text:style-name="T2"> sabbath)</text:span></text:p>
          <text:p text:style-name="P2"><text:span text:style-name="T2">22</text:span></text:p>
        </draw:line>
        <draw:line draw:style-name="gr1" draw:text-style-name="P1" draw:layer="layout" svg:x1="11.7cm" svg:y1="6.868cm" svg:x2="14.62cm" svg:y2="6.867cm">
          <text:p/>
        </draw:line>
        <draw:line draw:style-name="gr7" draw:text-style-name="P6" draw:layer="layout" svg:x1="11.7cm" svg:y1="5.344cm" svg:x2="14.621cm" svg:y2="5.344cm">
          <text:p><text:span text:style-name="T5">16</text:span></text:p>
          <text:p><text:span text:style-name="T5"/></text:p>
        </draw:line>
        <draw:line draw:style-name="gr7" draw:text-style-name="P6" draw:layer="layout" svg:x1="11.701cm" svg:y1="5.598cm" svg:x2="14.622cm" svg:y2="5.598cm">
          <text:p><text:span text:style-name="T5">17</text:span></text:p>
          <text:p><text:span text:style-name="T5"/></text:p>
        </draw:line>
        <draw:line draw:style-name="gr7" draw:text-style-name="P6" draw:layer="layout" svg:x1="11.702cm" svg:y1="5.852cm" svg:x2="14.623cm" svg:y2="5.852cm">
          <text:p><text:span text:style-name="T5">18</text:span></text:p>
          <text:p><text:span text:style-name="T5"/></text:p>
        </draw:line>
        <draw:line draw:style-name="gr7" draw:text-style-name="P6" draw:layer="layout" svg:x1="11.703cm" svg:y1="6.106cm" svg:x2="14.624cm" svg:y2="6.106cm">
          <text:p><text:span text:style-name="T5">19</text:span></text:p>
          <text:p><text:span text:style-name="T5"/></text:p>
        </draw:line>
        <draw:line draw:style-name="gr11" draw:text-style-name="P8" draw:layer="layout" svg:x1="11.704cm" svg:y1="6.36cm" svg:x2="14.625cm" svg:y2="6.36cm">
          <text:p text:style-name="P7"><text:span text:style-name="T2">20</text:span></text:p>
          <text:p text:style-name="P7"><text:span text:style-name="T2"/></text:p>
        </draw:line>
        <draw:line draw:style-name="gr12" draw:text-style-name="P3" draw:layer="layout" svg:x1="11.701cm" svg:y1="8.392cm" svg:x2="14.621cm" svg:y2="8.391cm">
          <text:p text:style-name="P2"><text:span text:style-name="T2">28 (4</text:span><text:span text:style-name="T3">th</text:span><text:span text:style-name="T2"> sabbath)</text:span></text:p>
          <text:p text:style-name="P2"><text:span text:style-name="T2">29</text:span></text:p>
        </draw:line>
        <draw:line draw:style-name="gr1" draw:text-style-name="P1" draw:layer="layout" svg:x1="11.701cm" svg:y1="8.646cm" svg:x2="14.621cm" svg:y2="8.645cm">
          <text:p/>
        </draw:line>
        <draw:line draw:style-name="gr7" draw:text-style-name="P6" draw:layer="layout" svg:x1="11.701cm" svg:y1="7.122cm" svg:x2="14.622cm" svg:y2="7.122cm">
          <text:p><text:span text:style-name="T5">23</text:span></text:p>
          <text:p><text:span text:style-name="T5"/></text:p>
        </draw:line>
        <draw:line draw:style-name="gr7" draw:text-style-name="P6" draw:layer="layout" svg:x1="11.702cm" svg:y1="7.376cm" svg:x2="14.623cm" svg:y2="7.376cm">
          <text:p><text:span text:style-name="T5">24</text:span></text:p>
          <text:p><text:span text:style-name="T5"/></text:p>
        </draw:line>
        <draw:line draw:style-name="gr7" draw:text-style-name="P6" draw:layer="layout" svg:x1="11.703cm" svg:y1="7.63cm" svg:x2="14.624cm" svg:y2="7.63cm">
          <text:p><text:span text:style-name="T5">25</text:span></text:p>
          <text:p><text:span text:style-name="T5"/></text:p>
        </draw:line>
        <draw:line draw:style-name="gr7" draw:text-style-name="P6" draw:layer="layout" svg:x1="11.704cm" svg:y1="7.884cm" svg:x2="14.625cm" svg:y2="7.884cm">
          <text:p><text:span text:style-name="T5">26</text:span></text:p>
          <text:p><text:span text:style-name="T5"/></text:p>
        </draw:line>
        <draw:line draw:style-name="gr13" draw:text-style-name="P8" draw:layer="layout" svg:x1="11.705cm" svg:y1="8.138cm" svg:x2="14.626cm" svg:y2="8.138cm">
          <text:p text:style-name="P7"><text:span text:style-name="T2">27</text:span></text:p>
          <text:p text:style-name="P7"><text:span text:style-name="T2"/></text:p>
        </draw:line>
        <draw:line draw:style-name="gr14" draw:text-style-name="P3" draw:layer="layout" svg:x1="11.702cm" svg:y1="10.17cm" svg:x2="14.622cm" svg:y2="10.169cm">
          <text:p text:style-name="P2"><text:span text:style-name="T2">35 (5</text:span><text:span text:style-name="T3">th</text:span><text:span text:style-name="T2"> sabbath)</text:span></text:p>
          <text:p text:style-name="P2"><text:span text:style-name="T2">36</text:span></text:p>
        </draw:line>
        <draw:line draw:style-name="gr1" draw:text-style-name="P1" draw:layer="layout" svg:x1="11.702cm" svg:y1="10.424cm" svg:x2="14.622cm" svg:y2="10.423cm">
          <text:p/>
        </draw:line>
        <draw:line draw:style-name="gr7" draw:text-style-name="P6" draw:layer="layout" svg:x1="11.702cm" svg:y1="8.9cm" svg:x2="14.623cm" svg:y2="8.9cm">
          <text:p><text:span text:style-name="T5">30</text:span></text:p>
          <text:p><text:span text:style-name="T5"/></text:p>
        </draw:line>
        <draw:line draw:style-name="gr7" draw:text-style-name="P6" draw:layer="layout" svg:x1="11.703cm" svg:y1="9.154cm" svg:x2="14.624cm" svg:y2="9.154cm">
          <text:p><text:span text:style-name="T5">31</text:span></text:p>
          <text:p><text:span text:style-name="T5"/></text:p>
        </draw:line>
        <draw:line draw:style-name="gr7" draw:text-style-name="P6" draw:layer="layout" svg:x1="11.704cm" svg:y1="9.408cm" svg:x2="14.625cm" svg:y2="9.408cm">
          <text:p><text:span text:style-name="T5">32</text:span></text:p>
          <text:p><text:span text:style-name="T5"/></text:p>
        </draw:line>
        <draw:line draw:style-name="gr7" draw:text-style-name="P6" draw:layer="layout" svg:x1="11.705cm" svg:y1="9.662cm" svg:x2="14.626cm" svg:y2="9.662cm">
          <text:p><text:span text:style-name="T5">33</text:span></text:p>
          <text:p><text:span text:style-name="T5"/></text:p>
        </draw:line>
        <draw:line draw:style-name="gr15" draw:text-style-name="P8" draw:layer="layout" svg:x1="11.706cm" svg:y1="9.916cm" svg:x2="14.627cm" svg:y2="9.916cm">
          <text:p text:style-name="P7"><text:span text:style-name="T2">34</text:span></text:p>
          <text:p text:style-name="P7"><text:span text:style-name="T2"/></text:p>
        </draw:line>
        <draw:line draw:style-name="gr16" draw:text-style-name="P3" draw:layer="layout" svg:x1="11.702cm" svg:y1="11.948cm" svg:x2="14.622cm" svg:y2="11.947cm">
          <text:p text:style-name="P2"><text:span text:style-name="T2">42 (6</text:span><text:span text:style-name="T3">th</text:span><text:span text:style-name="T2"> sabbath)</text:span></text:p>
          <text:p text:style-name="P2"><text:span text:style-name="T2">43</text:span></text:p>
        </draw:line>
        <draw:line draw:style-name="gr1" draw:text-style-name="P1" draw:layer="layout" svg:x1="11.702cm" svg:y1="12.202cm" svg:x2="14.622cm" svg:y2="12.201cm">
          <text:p/>
        </draw:line>
        <draw:line draw:style-name="gr7" draw:text-style-name="P6" draw:layer="layout" svg:x1="11.702cm" svg:y1="10.678cm" svg:x2="14.623cm" svg:y2="10.678cm">
          <text:p><text:span text:style-name="T5">37</text:span></text:p>
          <text:p><text:span text:style-name="T5"/></text:p>
        </draw:line>
        <draw:line draw:style-name="gr7" draw:text-style-name="P6" draw:layer="layout" svg:x1="11.703cm" svg:y1="10.932cm" svg:x2="14.624cm" svg:y2="10.932cm">
          <text:p><text:span text:style-name="T5">38</text:span></text:p>
          <text:p><text:span text:style-name="T5"/></text:p>
        </draw:line>
        <draw:line draw:style-name="gr7" draw:text-style-name="P6" draw:layer="layout" svg:x1="11.704cm" svg:y1="11.186cm" svg:x2="14.625cm" svg:y2="11.186cm">
          <text:p><text:span text:style-name="T5">39</text:span></text:p>
          <text:p><text:span text:style-name="T5"/></text:p>
        </draw:line>
        <draw:line draw:style-name="gr7" draw:text-style-name="P6" draw:layer="layout" svg:x1="11.705cm" svg:y1="11.44cm" svg:x2="14.626cm" svg:y2="11.44cm">
          <text:p><text:span text:style-name="T5">40</text:span></text:p>
          <text:p><text:span text:style-name="T5"/></text:p>
        </draw:line>
        <draw:line draw:style-name="gr17" draw:text-style-name="P8" draw:layer="layout" svg:x1="11.706cm" svg:y1="11.694cm" svg:x2="14.627cm" svg:y2="11.694cm">
          <text:p text:style-name="P7"><text:span text:style-name="T2">41</text:span></text:p>
          <text:p text:style-name="P7"><text:span text:style-name="T2"/></text:p>
        </draw:line>
        <draw:line draw:style-name="gr18" draw:text-style-name="P3" draw:layer="layout" svg:x1="11.703cm" svg:y1="13.719cm" svg:x2="14.623cm" svg:y2="13.718cm">
          <text:p text:style-name="P2"><text:span text:style-name="T2">49 (7</text:span><text:span text:style-name="T3">th</text:span><text:span text:style-name="T2"> sabbath)</text:span></text:p>
          <text:p text:style-name="P2"><text:span text:style-name="T2">50</text:span><text:span text:style-name="T3">th</text:span><text:span text:style-name="T2"> (1</text:span><text:span text:style-name="T3">st</text:span><text:span text:style-name="T2"> Jubile)</text:span></text:p>
        </draw:line>
        <draw:line draw:style-name="gr19" draw:text-style-name="P9" draw:layer="layout" svg:x1="11.703cm" svg:y1="13.96cm" svg:x2="14.623cm" svg:y2="13.959cm">
          <text:p/>
        </draw:line>
        <draw:line draw:style-name="gr7" draw:text-style-name="P6" draw:layer="layout" svg:x1="11.703cm" svg:y1="12.456cm" svg:x2="14.624cm" svg:y2="12.456cm">
          <text:p><text:span text:style-name="T5">44</text:span></text:p>
          <text:p><text:span text:style-name="T5"/></text:p>
        </draw:line>
        <draw:line draw:style-name="gr7" draw:text-style-name="P6" draw:layer="layout" svg:x1="11.704cm" svg:y1="12.71cm" svg:x2="14.625cm" svg:y2="12.71cm">
          <text:p><text:span text:style-name="T5">45</text:span></text:p>
          <text:p><text:span text:style-name="T5"/></text:p>
        </draw:line>
        <draw:line draw:style-name="gr7" draw:text-style-name="P6" draw:layer="layout" svg:x1="11.705cm" svg:y1="12.964cm" svg:x2="14.626cm" svg:y2="12.964cm">
          <text:p><text:span text:style-name="T5">46</text:span></text:p>
          <text:p><text:span text:style-name="T5"/></text:p>
        </draw:line>
        <draw:line draw:style-name="gr7" draw:text-style-name="P6" draw:layer="layout" svg:x1="11.706cm" svg:y1="13.218cm" svg:x2="14.627cm" svg:y2="13.218cm">
          <text:p><text:span text:style-name="T5">47</text:span></text:p>
          <text:p><text:span text:style-name="T5"/></text:p>
        </draw:line>
        <draw:line draw:style-name="gr20" draw:text-style-name="P8" draw:layer="layout" svg:x1="11.707cm" svg:y1="13.472cm" svg:x2="14.628cm" svg:y2="13.472cm">
          <text:p text:style-name="P7"><text:span text:style-name="T2">48</text:span></text:p>
          <text:p text:style-name="P7"><text:span text:style-name="T2"/></text:p>
        </draw:line>
        <draw:line draw:style-name="gr1" draw:text-style-name="P1" draw:layer="layout" svg:x1="11.699cm" svg:y1="16.001cm" svg:x2="14.619cm" svg:y2="16cm">
          <text:p/>
        </draw:line>
        <draw:line draw:style-name="gr2" draw:text-style-name="P1" draw:layer="layout" svg:x1="11.699cm" svg:y1="14.223cm" svg:x2="14.619cm" svg:y2="14.222cm">
          <text:p text:style-name="P2"><text:span text:style-name="T1">1</text:span></text:p>
          <text:p text:style-name="P2"><text:span text:style-name="T1"/></text:p>
        </draw:line>
        <draw:line draw:style-name="gr21" draw:text-style-name="P3" draw:layer="layout" svg:x1="11.699cm" svg:y1="15.747cm" svg:x2="14.619cm" svg:y2="15.746cm">
          <text:p text:style-name="P2"><text:span text:style-name="T2">7 (1</text:span><text:span text:style-name="T3">st</text:span><text:span text:style-name="T2"> sabbath)</text:span></text:p>
          <text:p text:style-name="P2"><text:span text:style-name="T2">8</text:span></text:p>
        </draw:line>
        <draw:line draw:style-name="gr5" draw:text-style-name="P5" draw:layer="layout" svg:x1="11.703cm" svg:y1="26.66cm" svg:x2="11.703cm" svg:y2="13.96cm">
          <text:p text:style-name="P4"><text:span text:style-name="T4">50 years</text:span></text:p>
          <text:p text:style-name="P4"><text:span text:style-name="T4"/></text:p>
        </draw:line>
        <draw:line draw:style-name="gr4" draw:text-style-name="P5" draw:layer="layout" svg:x1="14.624cm" svg:y1="13.961cm" svg:x2="14.624cm" svg:y2="26.407cm">
          <text:p text:style-name="P4"><text:span text:style-name="T4">49 years</text:span></text:p>
          <text:p text:style-name="P4"><text:span text:style-name="T4"/></text:p>
        </draw:line>
        <draw:line draw:style-name="gr22" draw:text-style-name="P3" draw:layer="layout" svg:x1="11.699cm" svg:y1="17.525cm" svg:x2="14.619cm" svg:y2="17.524cm">
          <text:p text:style-name="P2"><text:span text:style-name="T2">14 (2</text:span><text:span text:style-name="T3">nd</text:span><text:span text:style-name="T2"> sabbath)</text:span></text:p>
          <text:p text:style-name="P2"><text:span text:style-name="T2">15</text:span></text:p>
        </draw:line>
        <draw:line draw:style-name="gr1" draw:text-style-name="P1" draw:layer="layout" svg:x1="11.699cm" svg:y1="17.779cm" svg:x2="14.619cm" svg:y2="17.778cm">
          <text:p/>
        </draw:line>
        <draw:line draw:style-name="gr7" draw:text-style-name="P6" draw:layer="layout" svg:x1="11.698cm" svg:y1="14.476cm" svg:x2="14.619cm" svg:y2="14.476cm">
          <text:p><text:span text:style-name="T5">2</text:span></text:p>
          <text:p><text:span text:style-name="T5"/></text:p>
        </draw:line>
        <draw:line draw:style-name="gr7" draw:text-style-name="P6" draw:layer="layout" svg:x1="11.699cm" svg:y1="14.73cm" svg:x2="14.62cm" svg:y2="14.73cm">
          <text:p><text:span text:style-name="T5">3</text:span></text:p>
          <text:p><text:span text:style-name="T5"/></text:p>
        </draw:line>
        <draw:line draw:style-name="gr7" draw:text-style-name="P6" draw:layer="layout" svg:x1="11.7cm" svg:y1="14.984cm" svg:x2="14.621cm" svg:y2="14.984cm">
          <text:p><text:span text:style-name="T5">4</text:span></text:p>
          <text:p><text:span text:style-name="T5"/></text:p>
        </draw:line>
        <draw:line draw:style-name="gr7" draw:text-style-name="P6" draw:layer="layout" svg:x1="11.701cm" svg:y1="15.238cm" svg:x2="14.622cm" svg:y2="15.238cm">
          <text:p><text:span text:style-name="T5">5</text:span></text:p>
          <text:p><text:span text:style-name="T5"/></text:p>
        </draw:line>
        <draw:line draw:style-name="gr23" draw:text-style-name="P8" draw:layer="layout" svg:x1="11.702cm" svg:y1="15.492cm" svg:x2="14.623cm" svg:y2="15.492cm">
          <text:p text:style-name="P7"><text:span text:style-name="T2">6</text:span></text:p>
          <text:p text:style-name="P7"><text:span text:style-name="T2"/></text:p>
        </draw:line>
        <draw:line draw:style-name="gr7" draw:text-style-name="P6" draw:layer="layout" svg:x1="11.699cm" svg:y1="16.255cm" svg:x2="14.62cm" svg:y2="16.255cm">
          <text:p><text:span text:style-name="T5">9</text:span></text:p>
          <text:p><text:span text:style-name="T5"/></text:p>
        </draw:line>
        <draw:line draw:style-name="gr7" draw:text-style-name="P6" draw:layer="layout" svg:x1="11.7cm" svg:y1="16.509cm" svg:x2="14.621cm" svg:y2="16.509cm">
          <text:p><text:span text:style-name="T5">10</text:span></text:p>
          <text:p><text:span text:style-name="T5"/></text:p>
        </draw:line>
        <draw:line draw:style-name="gr7" draw:text-style-name="P6" draw:layer="layout" svg:x1="11.701cm" svg:y1="16.763cm" svg:x2="14.622cm" svg:y2="16.763cm">
          <text:p><text:span text:style-name="T5">11</text:span></text:p>
          <text:p><text:span text:style-name="T5"/></text:p>
        </draw:line>
        <draw:line draw:style-name="gr7" draw:text-style-name="P6" draw:layer="layout" svg:x1="11.702cm" svg:y1="17.017cm" svg:x2="14.623cm" svg:y2="17.017cm">
          <text:p><text:span text:style-name="T5">12</text:span></text:p>
          <text:p><text:span text:style-name="T5"/></text:p>
        </draw:line>
        <draw:line draw:style-name="gr24" draw:text-style-name="P8" draw:layer="layout" svg:x1="11.703cm" svg:y1="17.271cm" svg:x2="14.624cm" svg:y2="17.271cm">
          <text:p text:style-name="P7"><text:span text:style-name="T2">13</text:span></text:p>
          <text:p text:style-name="P7"><text:span text:style-name="T2"/></text:p>
        </draw:line>
        <draw:line draw:style-name="gr25" draw:text-style-name="P3" draw:layer="layout" svg:x1="11.7cm" svg:y1="19.303cm" svg:x2="14.62cm" svg:y2="19.302cm">
          <text:p text:style-name="P2"><text:span text:style-name="T2">21 (3</text:span><text:span text:style-name="T3">rd</text:span><text:span text:style-name="T2"> sabbath)</text:span></text:p>
          <text:p text:style-name="P2"><text:span text:style-name="T2">22</text:span></text:p>
        </draw:line>
        <draw:line draw:style-name="gr1" draw:text-style-name="P1" draw:layer="layout" svg:x1="11.7cm" svg:y1="19.557cm" svg:x2="14.62cm" svg:y2="19.556cm">
          <text:p/>
        </draw:line>
        <draw:line draw:style-name="gr7" draw:text-style-name="P6" draw:layer="layout" svg:x1="11.7cm" svg:y1="18.033cm" svg:x2="14.621cm" svg:y2="18.033cm">
          <text:p><text:span text:style-name="T5">16</text:span></text:p>
          <text:p><text:span text:style-name="T5"/></text:p>
        </draw:line>
        <draw:line draw:style-name="gr7" draw:text-style-name="P6" draw:layer="layout" svg:x1="11.701cm" svg:y1="18.287cm" svg:x2="14.622cm" svg:y2="18.287cm">
          <text:p><text:span text:style-name="T5">17</text:span></text:p>
          <text:p><text:span text:style-name="T5"/></text:p>
        </draw:line>
        <draw:line draw:style-name="gr7" draw:text-style-name="P6" draw:layer="layout" svg:x1="11.702cm" svg:y1="18.541cm" svg:x2="14.623cm" svg:y2="18.541cm">
          <text:p><text:span text:style-name="T5">18</text:span></text:p>
          <text:p><text:span text:style-name="T5"/></text:p>
        </draw:line>
        <draw:line draw:style-name="gr7" draw:text-style-name="P6" draw:layer="layout" svg:x1="11.703cm" svg:y1="18.795cm" svg:x2="14.624cm" svg:y2="18.795cm">
          <text:p><text:span text:style-name="T5">19</text:span></text:p>
          <text:p><text:span text:style-name="T5"/></text:p>
        </draw:line>
        <draw:line draw:style-name="gr26" draw:text-style-name="P8" draw:layer="layout" svg:x1="11.704cm" svg:y1="19.049cm" svg:x2="14.625cm" svg:y2="19.049cm">
          <text:p text:style-name="P7"><text:span text:style-name="T2">20</text:span></text:p>
          <text:p text:style-name="P7"><text:span text:style-name="T2"/></text:p>
        </draw:line>
        <draw:line draw:style-name="gr27" draw:text-style-name="P3" draw:layer="layout" svg:x1="11.701cm" svg:y1="21.081cm" svg:x2="14.621cm" svg:y2="21.08cm">
          <text:p text:style-name="P2"><text:span text:style-name="T2">28 (4</text:span><text:span text:style-name="T3">th</text:span><text:span text:style-name="T2"> sabbath)</text:span></text:p>
          <text:p text:style-name="P2"><text:span text:style-name="T2">29</text:span></text:p>
        </draw:line>
        <draw:line draw:style-name="gr1" draw:text-style-name="P1" draw:layer="layout" svg:x1="11.701cm" svg:y1="21.335cm" svg:x2="14.621cm" svg:y2="21.334cm">
          <text:p/>
        </draw:line>
        <draw:line draw:style-name="gr7" draw:text-style-name="P6" draw:layer="layout" svg:x1="11.701cm" svg:y1="19.811cm" svg:x2="14.622cm" svg:y2="19.811cm">
          <text:p><text:span text:style-name="T5">23</text:span></text:p>
          <text:p><text:span text:style-name="T5"/></text:p>
        </draw:line>
        <draw:line draw:style-name="gr7" draw:text-style-name="P6" draw:layer="layout" svg:x1="11.702cm" svg:y1="20.065cm" svg:x2="14.623cm" svg:y2="20.065cm">
          <text:p><text:span text:style-name="T5">24</text:span></text:p>
          <text:p><text:span text:style-name="T5"/></text:p>
        </draw:line>
        <draw:line draw:style-name="gr7" draw:text-style-name="P6" draw:layer="layout" svg:x1="11.703cm" svg:y1="20.319cm" svg:x2="14.624cm" svg:y2="20.319cm">
          <text:p><text:span text:style-name="T5">25</text:span></text:p>
          <text:p><text:span text:style-name="T5"/></text:p>
        </draw:line>
        <draw:line draw:style-name="gr7" draw:text-style-name="P6" draw:layer="layout" svg:x1="11.704cm" svg:y1="20.573cm" svg:x2="14.625cm" svg:y2="20.573cm">
          <text:p><text:span text:style-name="T5">26</text:span></text:p>
          <text:p><text:span text:style-name="T5"/></text:p>
        </draw:line>
        <draw:line draw:style-name="gr28" draw:text-style-name="P8" draw:layer="layout" svg:x1="11.705cm" svg:y1="20.827cm" svg:x2="14.626cm" svg:y2="20.827cm">
          <text:p text:style-name="P7"><text:span text:style-name="T2">27</text:span></text:p>
          <text:p text:style-name="P7"><text:span text:style-name="T2"/></text:p>
        </draw:line>
        <draw:line draw:style-name="gr29" draw:text-style-name="P3" draw:layer="layout" svg:x1="11.702cm" svg:y1="22.859cm" svg:x2="14.622cm" svg:y2="22.858cm">
          <text:p text:style-name="P2"><text:span text:style-name="T2">35 (5</text:span><text:span text:style-name="T3">th</text:span><text:span text:style-name="T2"> sabbath)</text:span></text:p>
          <text:p text:style-name="P2"><text:span text:style-name="T2">36</text:span></text:p>
        </draw:line>
        <draw:line draw:style-name="gr1" draw:text-style-name="P1" draw:layer="layout" svg:x1="11.702cm" svg:y1="23.113cm" svg:x2="14.622cm" svg:y2="23.112cm">
          <text:p/>
        </draw:line>
        <draw:line draw:style-name="gr7" draw:text-style-name="P6" draw:layer="layout" svg:x1="11.702cm" svg:y1="21.589cm" svg:x2="14.623cm" svg:y2="21.589cm">
          <text:p><text:span text:style-name="T5">30</text:span></text:p>
          <text:p><text:span text:style-name="T5"/></text:p>
        </draw:line>
        <draw:line draw:style-name="gr7" draw:text-style-name="P6" draw:layer="layout" svg:x1="11.703cm" svg:y1="21.843cm" svg:x2="14.624cm" svg:y2="21.843cm">
          <text:p><text:span text:style-name="T5">31</text:span></text:p>
          <text:p><text:span text:style-name="T5"/></text:p>
        </draw:line>
        <draw:line draw:style-name="gr7" draw:text-style-name="P6" draw:layer="layout" svg:x1="11.704cm" svg:y1="22.097cm" svg:x2="14.625cm" svg:y2="22.097cm">
          <text:p><text:span text:style-name="T5">32</text:span></text:p>
          <text:p><text:span text:style-name="T5"/></text:p>
        </draw:line>
        <draw:line draw:style-name="gr7" draw:text-style-name="P6" draw:layer="layout" svg:x1="11.705cm" svg:y1="22.351cm" svg:x2="14.626cm" svg:y2="22.351cm">
          <text:p><text:span text:style-name="T5">33</text:span></text:p>
          <text:p><text:span text:style-name="T5"/></text:p>
        </draw:line>
        <draw:line draw:style-name="gr30" draw:text-style-name="P8" draw:layer="layout" svg:x1="11.706cm" svg:y1="22.605cm" svg:x2="14.627cm" svg:y2="22.605cm">
          <text:p text:style-name="P7"><text:span text:style-name="T2">34</text:span></text:p>
          <text:p text:style-name="P7"><text:span text:style-name="T2"/></text:p>
        </draw:line>
        <draw:line draw:style-name="gr31" draw:text-style-name="P3" draw:layer="layout" svg:x1="11.702cm" svg:y1="24.637cm" svg:x2="14.622cm" svg:y2="24.636cm">
          <text:p text:style-name="P2"><text:span text:style-name="T2">42 (6</text:span><text:span text:style-name="T3">th</text:span><text:span text:style-name="T2"> sabbath)</text:span></text:p>
          <text:p text:style-name="P2"><text:span text:style-name="T2">43</text:span></text:p>
        </draw:line>
        <draw:line draw:style-name="gr1" draw:text-style-name="P1" draw:layer="layout" svg:x1="11.702cm" svg:y1="24.891cm" svg:x2="14.622cm" svg:y2="24.89cm">
          <text:p/>
        </draw:line>
        <draw:line draw:style-name="gr7" draw:text-style-name="P6" draw:layer="layout" svg:x1="11.702cm" svg:y1="23.367cm" svg:x2="14.623cm" svg:y2="23.367cm">
          <text:p><text:span text:style-name="T5">37</text:span></text:p>
          <text:p><text:span text:style-name="T5"/></text:p>
        </draw:line>
        <draw:line draw:style-name="gr7" draw:text-style-name="P6" draw:layer="layout" svg:x1="11.703cm" svg:y1="23.621cm" svg:x2="14.624cm" svg:y2="23.621cm">
          <text:p><text:span text:style-name="T5">38</text:span></text:p>
          <text:p><text:span text:style-name="T5"/></text:p>
        </draw:line>
        <draw:line draw:style-name="gr7" draw:text-style-name="P6" draw:layer="layout" svg:x1="11.704cm" svg:y1="23.875cm" svg:x2="14.625cm" svg:y2="23.875cm">
          <text:p><text:span text:style-name="T5">39</text:span></text:p>
          <text:p><text:span text:style-name="T5"/></text:p>
        </draw:line>
        <draw:line draw:style-name="gr7" draw:text-style-name="P6" draw:layer="layout" svg:x1="11.705cm" svg:y1="24.129cm" svg:x2="14.626cm" svg:y2="24.129cm">
          <text:p><text:span text:style-name="T5">40</text:span></text:p>
          <text:p><text:span text:style-name="T5"/></text:p>
        </draw:line>
        <draw:line draw:style-name="gr32" draw:text-style-name="P8" draw:layer="layout" svg:x1="11.706cm" svg:y1="24.383cm" svg:x2="14.627cm" svg:y2="24.383cm">
          <text:p text:style-name="P7"><text:span text:style-name="T2">41</text:span></text:p>
          <text:p text:style-name="P7"><text:span text:style-name="T2"/></text:p>
        </draw:line>
        <draw:line draw:style-name="gr33" draw:text-style-name="P3" draw:layer="layout" svg:x1="11.703cm" svg:y1="26.415cm" svg:x2="14.623cm" svg:y2="26.414cm">
          <text:p text:style-name="P2"><text:span text:style-name="T2">49 (7</text:span><text:span text:style-name="T3">th</text:span><text:span text:style-name="T2"> sabbath)</text:span></text:p>
          <text:p text:style-name="P2"><text:span text:style-name="T2">50</text:span><text:span text:style-name="T3">th</text:span><text:span text:style-name="T2"> (2</text:span><text:span text:style-name="T3">nd</text:span><text:span text:style-name="T2"> Jubile)</text:span></text:p>
        </draw:line>
        <draw:line draw:style-name="gr19" draw:text-style-name="P9" draw:layer="layout" svg:x1="11.703cm" svg:y1="26.669cm" svg:x2="14.623cm" svg:y2="26.668cm">
          <text:p/>
        </draw:line>
        <draw:line draw:style-name="gr7" draw:text-style-name="P6" draw:layer="layout" svg:x1="11.703cm" svg:y1="25.145cm" svg:x2="14.624cm" svg:y2="25.145cm">
          <text:p><text:span text:style-name="T5">44</text:span></text:p>
          <text:p><text:span text:style-name="T5"/></text:p>
        </draw:line>
        <draw:line draw:style-name="gr7" draw:text-style-name="P6" draw:layer="layout" svg:x1="11.704cm" svg:y1="25.399cm" svg:x2="14.625cm" svg:y2="25.399cm">
          <text:p><text:span text:style-name="T5">45</text:span></text:p>
          <text:p><text:span text:style-name="T5"/></text:p>
        </draw:line>
        <draw:line draw:style-name="gr7" draw:text-style-name="P6" draw:layer="layout" svg:x1="11.705cm" svg:y1="25.653cm" svg:x2="14.626cm" svg:y2="25.653cm">
          <text:p><text:span text:style-name="T5">46</text:span></text:p>
          <text:p><text:span text:style-name="T5"/></text:p>
        </draw:line>
        <draw:line draw:style-name="gr7" draw:text-style-name="P6" draw:layer="layout" svg:x1="11.706cm" svg:y1="25.907cm" svg:x2="14.627cm" svg:y2="25.907cm">
          <text:p><text:span text:style-name="T5">47</text:span></text:p>
          <text:p><text:span text:style-name="T5"/></text:p>
        </draw:line>
        <draw:line draw:style-name="gr34" draw:text-style-name="P8" draw:layer="layout" svg:x1="11.707cm" svg:y1="26.161cm" svg:x2="14.628cm" svg:y2="26.161cm">
          <text:p text:style-name="P7"><text:span text:style-name="T2">48</text:span></text:p>
          <text:p text:style-name="P7"><text:span text:style-name="T2"/></text:p>
        </draw:line>
        <draw:custom-shape draw:style-name="gr35" draw:text-style-name="P11" draw:layer="layout" svg:width="3.738cm" svg:height="1.441cm" svg:x="6.963cm" svg:y="17.046cm">
          <text:p text:style-name="P10"><text:span text:style-name="T6">Checklist:</text:span></text:p>
          <text:list text:style-name="L2">
            <text:list-item>
              <text:p text:style-name="P10"><text:span text:style-name="T6">6 years of sowing</text:span></text:p>
            </text:list-item>
            <text:list-item>
              <text:p text:style-name="P10"><text:span text:style-name="T6">1 year sabbath of rest</text:span></text:p>
            </text:list-item>
            <text:list-item>
              <text:p text:style-name="P10"><text:span text:style-name="T6">49 years between Jubiles</text:span></text:p>
            </text:list-item>
            <text:list-item>
              <text:p text:style-name="P10"><text:span text:style-name="T6">Every 50</text:span><text:span text:style-name="T7">th</text:span><text:span text:style-name="T6"> year is a Jubile</text:span></text:p>
            </text:list-item>
          </text:list>
          <draw:enhanced-geometry svg:viewBox="0 0 21600 21600" draw:type="rectangle" draw:enhanced-path="M 0 0 L 21600 0 21600 21600 0 21600 0 0 Z N"/>
        </draw:custom-shape>
        <draw:custom-shape draw:style-name="gr35" draw:text-style-name="P13" draw:layer="layout" svg:width="3.738cm" svg:height="7.867cm" svg:x="6.963cm" svg:y="9.179cm">
          <text:p text:style-name="P12"><text:span text:style-name="T6">Leviticus 25:3-4</text:span></text:p>
          <text:p text:style-name="P12"><text:span text:style-name="T8">Six years thou shalt sow thy field</text:span><text:span text:style-name="T6">, and six years thou shalt prune thy vineyard, and gather in the fruit thereof; But in </text:span><text:span text:style-name="T8">the seventh year shall be a sabbath of rest</text:span><text:span text:style-name="T6"> unto the land, a sabbath for the LORD: thou shalt neither sow thy field, nor prune thy vineyard.</text:span></text:p>
          <text:p text:style-name="P12"><text:span text:style-name="T6"/></text:p>
          <text:p text:style-name="P12"><text:span text:style-name="T6">Leviticus 25:8</text:span></text:p>
          <text:p text:style-name="P12"><text:span text:style-name="T6">And thou shalt number seven sabbaths of years unto thee, seven times seven years; and the space of the seven sabbaths of years shall be unto thee </text:span><text:span text:style-name="T8">forty and nine years</text:span><text:span text:style-name="T6">.</text:span></text:p>
          <text:p text:style-name="P12"><text:span text:style-name="T6"/></text:p>
          <text:p text:style-name="P12"><text:span text:style-name="T6">Leviticus 25:9-10</text:span></text:p>
          <text:p text:style-name="P12"><text:span text:style-name="T6">Then shalt thou cause the trumpet of the jubile to sound on the tenth day of the seventh month, in the day of atonement shall ye make the trumpet sound throughout all your land. And </text:span><text:span text:style-name="T8">ye shall hallow the fiftieth year</text:span><text:span text:style-name="T6">, and proclaim liberty throughout all the land unto all the inhabitants thereof: it shall be a jubile unto you; and ye shall return every man unto his possession, and ye shall return every man unto his family.</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 draw:style="rect" draw:dots1="1" draw:dots1-length="300%" draw:distance="100%"/>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draw:auto-grow-height="false"/>
      <style:paragraph-properties fo:text-align="center"/>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31T11:46:44.060282885</meta:creation-date>
    <dc:date>2025-08-13T13:55:43.111168600</dc:date>
    <meta:editing-duration>PT6H17M41S</meta:editing-duration>
    <meta:editing-cycles>91</meta:editing-cycles>
    <meta:generator>LibreOffice/25.2.5.2$Windows_X86_64 LibreOffice_project/03d19516eb2e1dd5d4ccd751a0d6f35f35e08022</meta:generator>
    <meta:document-statistic meta:object-count="107"/>
  </office:meta>
</office:document-meta>
</file>