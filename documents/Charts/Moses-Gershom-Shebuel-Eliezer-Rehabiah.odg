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dash" draw:stroke-dash="Dot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56cm" fo:min-width="1.97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1.356cm" fo:min-width="2.46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356cm" fo:min-width="2.14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800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1.9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2.16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Ubuntu" style:text-underline-style="none"/>
    </style:style>
    <style:style style:name="P2" style:family="paragraph">
      <style:paragraph-properties fo:text-align="center"/>
      <style:text-properties style:font-name="Ubuntu" fo:font-size="12pt" style:text-underline-style="none"/>
    </style:style>
    <style:style style:name="P3" style:family="paragraph">
      <style:paragraph-properties fo:text-align="center" style:writing-mode="lr-tb"/>
      <style:text-properties style:font-name="Ubuntu" fo:font-size="12pt" style:text-underline-styl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2pt" style:text-underline-style="none"/>
    </style:style>
    <style:style style:name="P5" style:family="paragraph">
      <loext:graphic-properties draw:fill-color="#ffd7d7"/>
      <style:paragraph-properties fo:text-align="center" style:writing-mode="lr-tb"/>
      <style:text-properties style:font-name="Ubuntu" fo:font-size="12pt" style:text-underline-style="none"/>
    </style:style>
    <style:style style:name="T1" style:family="text">
      <style:text-properties style:font-name="Ubuntu" fo:font-size="12pt" style:text-underline-style="none" fo:font-weight="bold" style:font-size-asian="10pt" style:font-weight-asian="bold" style:font-size-complex="10pt" style:font-weight-complex="bold"/>
    </style:style>
    <style:style style:name="T2" style:family="text">
      <style:text-properties style:font-name="Ubuntu" fo:font-size="10pt" style:text-underline-style="none" style:font-size-asian="10pt" style:font-size-complex="10pt"/>
    </style:style>
    <style:style style:name="T3" style:family="text">
      <style:text-properties style:font-name="Ubuntu" fo:font-size="12pt" style:text-underline-style="none" fo:font-weight="bold" style:font-weight-asian="bold" style:font-weight-complex="bold"/>
    </style:style>
    <style:style style:name="T4" style:family="text">
      <style:text-properties style:font-name="Ubuntu" fo:font-size="11pt" style:text-underline-style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296cm" svg:x1="12.786cm" svg:y1="6.845cm" svg:x2="13.807cm" svg:y2="9.76cm" draw:start-shape="id1" draw:start-glue-point="0" draw:end-shape="id2" draw:end-glue-point="0" svg:d="M12786 6845c0 3541 1021 2084 1021 2915" svg:viewBox="0 0 1022 2916">
          <text:p/>
        </draw:connector>
        <draw:connector draw:style-name="gr1" draw:text-style-name="P1" draw:layer="layout" draw:type="curve" draw:line-skew="0.29cm" svg:x1="12.786cm" svg:y1="6.845cm" svg:x2="10.806cm" svg:y2="9.772cm" draw:start-shape="id1" draw:start-glue-point="0" draw:end-shape="id3" draw:end-glue-point="0" svg:d="M12786 6845c0 3541-1980 2078-1980 2927" svg:viewBox="0 0 1981 2928">
          <text:p/>
        </draw:connector>
        <draw:connector draw:style-name="gr1" draw:text-style-name="P1" draw:layer="layout" draw:type="curve" draw:line-skew="0.369cm" svg:x1="9.218cm" svg:y1="10.661cm" svg:x2="7.807cm" svg:y2="12.673cm" draw:start-shape="id4" draw:start-glue-point="0" draw:end-shape="id5" draw:end-glue-point="0" svg:d="M9218 10661c0 2076-1411 1070-1411 2012" svg:viewBox="0 0 1412 2013">
          <text:p/>
        </draw:connector>
        <draw:connector draw:style-name="gr1" draw:text-style-name="P1" draw:layer="layout" draw:type="curve" draw:line-skew="0.369cm" svg:x1="9.218cm" svg:y1="10.661cm" svg:x2="10.805cm" svg:y2="12.674cm" draw:start-shape="id4" draw:start-glue-point="0" draw:end-shape="id6" draw:end-glue-point="0" svg:d="M9218 10661c0 2076 1587 1070 1587 2013" svg:viewBox="0 0 1588 2014">
          <text:p/>
        </draw:connector>
        <draw:custom-shape draw:style-name="gr2" draw:text-style-name="P3" xml:id="id8" draw:id="id8" draw:layer="layout" svg:width="2.648cm" svg:height="1.778cm" svg:x="6.38cm" svg:y="4.751cm">
          <text:p text:style-name="P2"><text:span text:style-name="T1">Gershon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7" draw:id="id7" draw:layer="layout" svg:width="2.648cm" svg:height="1.778cm" svg:x="9.477cm" svg:y="1.947cm">
          <text:p text:style-name="P2"><text:span text:style-name="T1">Levi</text:span></text:p>
          <text:p text:style-name="P2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7.704cm" svg:y2="4.751cm" draw:start-shape="id7" draw:start-glue-point="2" draw:end-shape="id8" draw:end-glue-point="0" svg:d="M10801 3725c0 771-3097 258-3097 1026" svg:viewBox="0 0 3098 1027">
          <text:p/>
        </draw:connector>
        <draw:custom-shape draw:style-name="gr2" draw:text-style-name="P3" xml:id="id9" draw:id="id9" draw:layer="layout" svg:width="2.648cm" svg:height="1.778cm" svg:x="9.481cm" svg:y="4.752cm">
          <text:p text:style-name="P2"><text:span text:style-name="T1">Kohath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0" draw:id="id10" draw:layer="layout" svg:width="2.648cm" svg:height="1.778cm" svg:x="3.197cm" svg:y="4.74cm">
          <text:p text:style-name="P2"><text:span text:style-name="T1">Merari</text:span></text:p>
          <text:p text:style-name="P4"><text:span text:style-name="T2">1Ch 23: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1cm" svg:y1="3.725cm" svg:x2="10.805cm" svg:y2="4.752cm" draw:start-shape="id7" draw:start-glue-point="2" draw:end-shape="id9" draw:end-glue-point="0" svg:d="M10801 3725c0 771 4 258 4 1027" svg:viewBox="0 0 5 1028">
          <text:p/>
        </draw:connector>
        <draw:connector draw:style-name="gr1" draw:text-style-name="P1" draw:layer="layout" draw:type="curve" svg:x1="10.801cm" svg:y1="3.725cm" svg:x2="4.521cm" svg:y2="4.74cm" draw:start-shape="id7" draw:start-glue-point="2" draw:end-shape="id10" draw:end-glue-point="0" svg:d="M10801 3725c0 762-6280 255-6280 1015" svg:viewBox="0 0 6281 1016">
          <text:p/>
        </draw:connector>
        <draw:custom-shape draw:style-name="gr2" draw:text-style-name="P3" xml:id="id11" draw:id="id11" draw:layer="layout" svg:width="2.648cm" svg:height="1.778cm" svg:x="9.482cm" svg:y="7.153cm">
          <text:p text:style-name="P2"><text:span text:style-name="T1">Amram</text:span></text:p>
          <text:p text:style-name="P4"><text:span text:style-name="T2">1Ch 23: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5cm" svg:y1="6.53cm" svg:x2="10.806cm" svg:y2="7.153cm" draw:start-shape="id9" draw:start-glue-point="2" draw:end-shape="id11" draw:end-glue-point="0" svg:d="M10805 6530c0 468 1 157 1 623" svg:viewBox="0 0 2 624">
          <text:p/>
        </draw:connector>
        <draw:custom-shape draw:style-name="gr3" draw:text-style-name="P5" xml:id="id13" draw:id="id13" draw:layer="layout" svg:width="3.135cm" svg:height="1.778cm" svg:x="5.82cm" svg:y="9.772cm">
          <text:p text:style-name="P2"><text:span text:style-name="T3">Zipporah</text:span></text:p>
          <text:p text:style-name="P2"><text:span text:style-name="T2">Exo 2:21, 18:2</text:span></text:p>
          <text:p text:style-name="P2"><text:span text:style-name="T2">Num 12: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3" draw:id="id3" draw:layer="layout" svg:width="2.648cm" svg:height="1.778cm" svg:x="9.482cm" svg:y="9.772cm">
          <text:p text:style-name="P2"><text:span text:style-name="T1">Moses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" draw:id="id2" draw:layer="layout" svg:width="2.648cm" svg:height="1.778cm" svg:x="12.483cm" svg:y="9.76cm">
          <text:p text:style-name="P2"><text:span text:style-name="T1">Aaron</text:span></text:p>
          <text:p text:style-name="P4"><text:span text:style-name="T2">1Ch 23: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xml:id="id12" draw:id="id12" draw:layer="layout" svg:width="2.817cm" svg:height="1.778cm" svg:x="13.441cm" svg:y="4.759cm">
          <text:p text:style-name="P2"><text:span text:style-name="T3">Jochebed</text:span></text:p>
          <text:p text:style-name="P2"><text:span text:style-name="T2">Exo 6:20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xml:id="id1" draw:id="id1" draw:layer="layout" draw:type="curve" svg:x1="13.441cm" svg:y1="5.648cm" svg:x2="12.13cm" svg:y2="8.042cm" draw:start-shape="id12" draw:start-glue-point="3" draw:end-shape="id11" draw:end-glue-point="1" svg:d="M13441 5648c-982 0-327 2394-1311 2394" svg:viewBox="0 0 1312 2395">
          <text:p/>
        </draw:connector>
        <draw:custom-shape draw:style-name="gr4" draw:text-style-name="P5" draw:layer="layout" svg:width="2.817cm" svg:height="1.778cm" svg:x="15.577cm" svg:y="9.76cm">
          <text:p text:style-name="P2"><text:span text:style-name="T3">Miriam</text:span></text:p>
          <text:p text:style-name="P2"><text:span text:style-name="T2">Num 26:5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1" xml:id="id4" draw:id="id4" draw:layer="layout" draw:type="curve" svg:x1="9.482cm" svg:y1="10.661cm" svg:x2="8.955cm" svg:y2="10.661cm" draw:start-shape="id3" draw:start-glue-point="3" draw:end-shape="id13" draw:end-glue-point="1" svg:d="M9482 10661h-527" svg:viewBox="0 0 528 1">
          <text:p/>
        </draw:connector>
        <draw:connector draw:style-name="gr1" draw:text-style-name="P1" draw:layer="layout" draw:type="curve" svg:x1="7.807cm" svg:y1="14.451cm" svg:x2="7.806cm" svg:y2="14.868cm" draw:start-shape="id5" draw:start-glue-point="2" draw:end-shape="id14" draw:end-glue-point="0" svg:d="M7807 14451c0 313-1 105-1 417" svg:viewBox="0 0 2 418">
          <text:p/>
        </draw:connector>
        <draw:connector draw:style-name="gr1" draw:text-style-name="P1" draw:layer="layout" draw:type="curve" svg:x1="7.806cm" svg:y1="16.646cm" svg:x2="7.808cm" svg:y2="17.656cm" draw:start-shape="id14" draw:start-glue-point="2" draw:end-shape="id15" draw:end-glue-point="0" svg:d="M7806 16646c0 759 2 254 2 1010" svg:viewBox="0 0 3 1011">
          <text:p/>
        </draw:connector>
        <draw:connector draw:style-name="gr1" draw:text-style-name="P1" draw:layer="layout" draw:type="curve" svg:x1="10.809cm" svg:y1="16.653cm" svg:x2="10.811cm" svg:y2="17.659cm" draw:start-shape="id16" draw:start-glue-point="2" draw:end-shape="id17" draw:end-glue-point="0" svg:d="M10809 16653c0 756 2 253 2 1006" svg:viewBox="0 0 3 1007">
          <text:p/>
        </draw:connector>
        <draw:connector draw:style-name="gr1" draw:text-style-name="P1" draw:layer="layout" draw:type="curve" svg:x1="10.805cm" svg:y1="14.452cm" svg:x2="10.809cm" svg:y2="14.875cm" draw:start-shape="id6" draw:start-glue-point="2" draw:end-shape="id16" draw:end-glue-point="0" svg:d="M10805 14452c0 318 4 107 4 423" svg:viewBox="0 0 5 424">
          <text:p/>
        </draw:connector>
        <draw:custom-shape draw:style-name="gr2" draw:text-style-name="P3" xml:id="id5" draw:id="id5" draw:layer="layout" svg:width="2.648cm" svg:height="1.778cm" svg:x="6.483cm" svg:y="12.673cm">
          <text:p text:style-name="P2"><text:span text:style-name="T1">Gershom</text:span></text:p>
          <text:p text:style-name="P4"><text:span text:style-name="T2">Exo 2: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6" draw:id="id6" draw:layer="layout" svg:width="2.642cm" svg:height="1.778cm" svg:x="9.484cm" svg:y="12.674cm">
          <text:p text:style-name="P2"><text:span text:style-name="T1">Eliezer</text:span></text:p>
          <text:p text:style-name="P4"><text:span text:style-name="T2">Exo 18: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3" xml:id="id14" draw:id="id14" draw:layer="layout" svg:width="2.642cm" svg:height="1.778cm" svg:x="6.485cm" svg:y="14.868cm">
          <text:p text:style-name="P2"><text:span text:style-name="T4">Shebuel</text:span></text:p>
          <text:p text:style-name="P2"><text:span text:style-name="T2">1Ch 23:16</text:span></text:p>
          <text:p text:style-name="P2"><text:span text:style-name="T4">Shubael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5" draw:id="id15" draw:layer="layout" svg:width="2.648cm" svg:height="1.778cm" svg:x="6.484cm" svg:y="17.656cm">
          <text:p text:style-name="P2"><text:span text:style-name="T1">Jehdeiah</text:span></text:p>
          <text:p text:style-name="P4"><text:span text:style-name="T2">1Ch 24: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6" draw:id="id16" draw:layer="layout" svg:width="2.648cm" svg:height="1.778cm" svg:x="9.485cm" svg:y="14.875cm">
          <text:p text:style-name="P2"><text:span text:style-name="T1">Rehabiah</text:span></text:p>
          <text:p text:style-name="P4"><text:span text:style-name="T2">1Ch 23: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8" draw:id="id18" draw:layer="layout" svg:width="2.648cm" svg:height="1.778cm" svg:x="12.786cm" svg:y="17.658cm">
          <text:p text:style-name="P2"><text:span text:style-name="T1">Isshiah</text:span></text:p>
          <text:p text:style-name="P4"><text:span text:style-name="T2">1Ch 24: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7" draw:id="id17" draw:layer="layout" svg:width="2.648cm" svg:height="1.778cm" svg:x="9.487cm" svg:y="17.659cm">
          <text:p text:style-name="P2"><text:span text:style-name="T1">Jeshaiah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1" draw:id="id21" draw:layer="layout" svg:width="2.648cm" svg:height="1.778cm" svg:x="9.488cm" svg:y="19.81cm">
          <text:p text:style-name="P2"><text:span text:style-name="T1">Joram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19" draw:id="id19" draw:layer="layout" svg:width="2.648cm" svg:height="1.778cm" svg:x="9.489cm" svg:y="21.979cm">
          <text:p text:style-name="P2"><text:span text:style-name="T1">Zichri</text:span></text:p>
          <text:p text:style-name="P4"><text:span text:style-name="T2">1Ch 26: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" xml:id="id20" draw:id="id20" draw:layer="layout" svg:width="2.837cm" svg:height="1.778cm" svg:x="9.397cm" svg:y="24.216cm">
          <text:p text:style-name="P2"><text:span text:style-name="T1">Shelomith</text:span></text:p>
          <text:p text:style-name="P4"><text:span text:style-name="T2">1Ch 26:25-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10.809cm" svg:y1="16.653cm" svg:x2="14.11cm" svg:y2="17.658cm" draw:start-shape="id16" draw:start-glue-point="2" draw:end-shape="id18" draw:end-glue-point="0" svg:d="M10809 16653c0 754 3301 252 3301 1005" svg:viewBox="0 0 3302 1006">
          <text:p/>
        </draw:connector>
        <draw:connector draw:style-name="gr1" draw:text-style-name="P1" draw:layer="layout" draw:type="curve" svg:x1="10.813cm" svg:y1="23.757cm" svg:x2="10.815cm" svg:y2="24.216cm" draw:start-shape="id19" draw:start-glue-point="2" draw:end-shape="id20" draw:end-glue-point="0" svg:d="M10813 23757c0 345 2 116 2 459" svg:viewBox="0 0 3 460">
          <text:p/>
        </draw:connector>
        <draw:connector draw:style-name="gr1" draw:text-style-name="P1" draw:layer="layout" draw:type="curve" svg:x1="10.812cm" svg:y1="21.588cm" svg:x2="10.813cm" svg:y2="21.979cm" draw:start-shape="id21" draw:start-glue-point="2" draw:end-shape="id19" draw:end-glue-point="0" svg:d="M10812 21588c0 294 1 99 1 391" svg:viewBox="0 0 2 392">
          <text:p/>
        </draw:connector>
        <draw:connector draw:style-name="gr1" draw:text-style-name="P1" draw:layer="layout" draw:type="curve" svg:x1="10.811cm" svg:y1="19.437cm" svg:x2="10.812cm" svg:y2="19.81cm" draw:start-shape="id17" draw:start-glue-point="2" draw:end-shape="id21" draw:end-glue-point="0" svg:d="M10811 19437c0 280 1 94 1 373" svg:viewBox="0 0 2 37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20:52.755988132</dc:date>
    <meta:editing-duration>PT8H53M5S</meta:editing-duration>
    <meta:editing-cycles>151</meta:editing-cycles>
    <meta:generator>LibreOffice/26.2.4.2$Linux_X86_64 LibreOffice_project/64a984c51f4702dbd3710b13428c673a2f1292e7</meta:generator>
    <dc:title>Moses-Gershom-Shebuel-Eliezer-Rehabiah</dc:title>
    <meta:document-statistic meta:object-count="38"/>
  </office:meta>
</office:document-meta>
</file>