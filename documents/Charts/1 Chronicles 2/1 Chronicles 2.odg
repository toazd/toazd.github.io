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5000000F66A077216.png" manifest:media-type="image/png"/>
  <manifest:file-entry manifest:full-path="Pictures/10000001000001C2000000EEC6D7A31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BlackChancery" svg:font-family="BlackChancery" style:font-pitch="variable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Gabriela Nerd Font1" svg:font-family="'Gabriela Nerd Fon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dp2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4.508cm" fo:min-width="18.47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stroke="dash" draw:stroke-dash="Dot" svg:stroke-width="0.1cm" svg:stroke-color="#ff0000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3" style:family="graphic" style:parent-style-name="objectwithoutfill">
      <style:graphic-properties draw:stroke="solid" draw:stroke-dash="Dot" svg:stroke-width="0.1cm" svg:stroke-color="#afd095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 fo:min-height="2.038cm" fo:min-width="2.8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cm" svg:stroke-color="#bf0041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6" style:family="graphic" style:parent-style-name="objectwithoutfill">
      <style:graphic-properties svg:stroke-width="0.1cm" svg:stroke-color="#ff000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ec9ba4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1cm" svg:stroke-color="#80008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10" style:family="graphic" style:parent-style-name="standard">
      <style:graphic-properties draw:fill="solid" draw:fill-color="#ec9ba4" draw:textarea-horizontal-align="justify" draw:textarea-vertical-align="middle" draw:auto-grow-height="false" fo:min-height="1.165cm" fo:min-width="2.639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38cm" fo:min-width="2.597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Dot" svg:stroke-width="0.1cm" svg:stroke-color="#800080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13" style:family="graphic" style:parent-style-name="standard">
      <style:graphic-properties draw:fill="solid" draw:fill-color="#ffb66c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ffb66c" draw:textarea-horizontal-align="justify" draw:textarea-vertical-align="middle" draw:auto-grow-height="false" fo:min-height="2.038cm" fo:min-width="2.8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Dot" svg:stroke-width="0.1cm" svg:stroke-color="#ffb66c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16" style:family="graphic" style:parent-style-name="standard">
      <style:graphic-properties draw:fill="solid" draw:fill-color="#afd095" draw:opacity="100%" draw:textarea-horizontal-align="justify" draw:textarea-vertical-align="middle" draw:auto-grow-height="false" fo:min-height="3.678cm" fo:min-width="3.322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Dot" svg:stroke-width="0.1cm" svg:stroke-color="#b2b2b2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2.085cm" fo:min-width="2.745cm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729fcf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afd095" draw:textarea-horizontal-align="justify" draw:textarea-vertical-align="middle" draw:auto-grow-height="false" fo:min-height="2.925cm" fo:min-width="2.773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stroke="dash" draw:stroke-dash="Dot" svg:stroke-width="0.1cm" svg:stroke-color="#afd095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2.634cm" fo:min-width="3.6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stroke="solid" draw:stroke-dash="Dot" svg:stroke-width="0.1cm" svg:stroke-color="#ff0000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24" style:family="graphic" style:parent-style-name="objectwithoutfill">
      <style:graphic-properties draw:stroke-dash="Dot" svg:stroke-width="0.1cm" svg:stroke-color="#ff0000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25" style:family="graphic" style:parent-style-name="standard">
      <style:graphic-properties draw:textarea-horizontal-align="justify" draw:textarea-vertical-align="middle" draw:auto-grow-height="false" fo:min-height="2.549cm" fo:min-width="2.498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038cm" fo:min-width="2.8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3.581cm" fo:min-width="2.498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13cm" fo:min-width="2.892cm" style:writing-mode="lr-tb" loext:decorative="false"/>
      <style:paragraph-properties style:writing-mode="lr-tb"/>
    </style:style>
    <style:style style:name="gr29" style:family="graphic" style:parent-style-name="standard">
      <style:graphic-properties draw:fill="solid" draw:fill-color="#afd095" draw:textarea-horizontal-align="justify" draw:textarea-vertical-align="middle" draw:auto-grow-height="false" fo:min-height="2.085cm" fo:min-width="2.745cm" style:writing-mode="lr-tb" loext:decorative="false"/>
      <style:paragraph-properties style:writing-mode="lr-tb"/>
    </style:style>
    <style:style style:name="gr30" style:family="graphic" style:parent-style-name="standard">
      <style:graphic-properties draw:fill="solid" draw:fill-color="#afd095" draw:textarea-horizontal-align="justify" draw:textarea-vertical-align="middle" draw:auto-grow-height="false" fo:min-height="2.085cm" fo:min-width="2.644cm" style:writing-mode="lr-tb" loext:decorative="false"/>
      <style:paragraph-properties style:writing-mode="lr-tb"/>
    </style:style>
    <style:style style:name="gr31" style:family="graphic" style:parent-style-name="objectwithoutfill">
      <style:graphic-properties svg:stroke-width="0.106cm" svg:stroke-color="#ff8000" draw:marker-start-width="0.35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32" style:family="graphic" style:parent-style-name="objectwithoutfill">
      <style:graphic-properties draw:stroke="dash" draw:stroke-dash="Dot" svg:stroke-width="0.1cm" svg:stroke-color="#afd095" draw:marker-start-width="0.242cm" draw:marker-end-width="0.242cm" svg:stroke-linecap="butt" draw:fill="none" draw:textarea-horizontal-align="center" draw:textarea-vertical-align="middle" fo:padding-top="0.174cm" fo:padding-bottom="0.174cm" fo:padding-left="0.299cm" fo:padding-right="0.299cm" loext:decorative="false"/>
      <style:paragraph-properties style:writing-mode="lr-tb"/>
    </style:style>
    <style:style style:name="gr33" style:family="graphic" style:parent-style-name="objectwithoutfill">
      <style:graphic-properties draw:stroke="dash" draw:stroke-dash="Dot" svg:stroke-width="0.1cm" svg:stroke-color="#ffb66c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34" style:family="graphic" style:parent-style-name="standard">
      <style:graphic-properties draw:fill="solid" draw:fill-color="#afd095" draw:textarea-horizontal-align="justify" draw:textarea-vertical-align="middle" draw:auto-grow-height="false" fo:min-height="2.681cm" fo:min-width="3.138cm" style:writing-mode="lr-tb" loext:decorative="false"/>
      <style:paragraph-properties style:writing-mode="lr-tb"/>
    </style:style>
    <style:style style:name="gr35" style:family="graphic" style:parent-style-name="standard">
      <style:graphic-properties draw:fill="solid" draw:fill-color="#afd095" draw:textarea-horizontal-align="justify" draw:textarea-vertical-align="middle" draw:auto-grow-height="false" fo:min-height="3.139cm" fo:min-width="3.901cm" style:writing-mode="lr-tb" loext:decorative="false"/>
      <style:paragraph-properties style:writing-mode="lr-tb"/>
    </style:style>
    <style:style style:name="gr36" style:family="graphic" style:parent-style-name="standard">
      <style:graphic-properties draw:fill="solid" draw:fill-color="#afd095" draw:textarea-horizontal-align="justify" draw:textarea-vertical-align="middle" draw:auto-grow-height="false" fo:min-height="2.038cm" fo:min-width="2.749cm" style:writing-mode="lr-tb" loext:decorative="false"/>
      <style:paragraph-properties style:writing-mode="lr-tb"/>
    </style:style>
    <style:style style:name="gr37" style:family="graphic" style:parent-style-name="standard">
      <style:graphic-properties draw:fill="solid" draw:fill-color="#ffb66c" draw:textarea-horizontal-align="justify" draw:textarea-vertical-align="middle" draw:auto-grow-height="false" fo:min-height="2.038cm" fo:min-width="3.054cm" style:writing-mode="lr-tb" loext:decorative="false"/>
      <style:paragraph-properties style:writing-mode="lr-tb"/>
    </style:style>
    <style:style style:name="gr38" style:family="graphic" style:parent-style-name="standard">
      <style:graphic-properties draw:fill="solid" draw:fill-color="#ffb66c" draw:textarea-horizontal-align="justify" draw:textarea-vertical-align="middle" draw:auto-grow-height="false" fo:min-height="2.038cm" fo:min-width="3.105cm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svg:stroke-width="0.106cm" svg:stroke-color="#ff8000" draw:marker-start-width="0.359cm" draw:marker-end-width="0.359cm" draw:fill="none" loext:fill-use-slide-background="false" draw:textarea-horizontal-align="center" draw:textarea-vertical-align="middle" draw:auto-grow-height="false" fo:min-height="6.83cm" fo:min-width="6.58cm" fo:padding-top="0.178cm" fo:padding-bottom="0.178cm" fo:padding-left="0.303cm" fo:padding-right="0.303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fill="solid" draw:fill-color="#729fcf" draw:textarea-horizontal-align="justify" draw:textarea-vertical-align="middle" draw:auto-grow-height="false" fo:min-height="2.038cm" fo:min-width="2.597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2.176cm" fo:min-width="2.532cm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035cm" svg:stroke-color="#ff8000" draw:marker-start-width="0.253cm" draw:marker-end-width="0.253cm" draw:fill="none" loext:fill-use-slide-background="false" draw:textarea-horizontal-align="right" draw:textarea-vertical-align="top" draw:auto-grow-height="false" fo:min-height="11.359cm" fo:min-width="14.389cm" fo:padding-top="0.143cm" fo:padding-bottom="0.143cm" fo:padding-left="0.268cm" fo:padding-right="0.268cm" style:writing-mode="lr-tb" loext:decorative="false"/>
      <style:paragraph-properties style:writing-mode="lr-tb"/>
    </style:style>
    <style:style style:name="gr43" style:family="graphic" style:parent-style-name="standard">
      <style:graphic-properties draw:fill="solid" draw:fill-color="#afd095" draw:textarea-horizontal-align="justify" draw:textarea-vertical-align="middle" draw:auto-grow-height="false" fo:min-height="2.038cm" fo:min-width="2.902cm" style:writing-mode="lr-tb" loext:decorative="false"/>
      <style:paragraph-properties style:writing-mode="lr-tb"/>
    </style:style>
    <style:style style:name="gr44" style:family="graphic" style:parent-style-name="standard">
      <style:graphic-properties draw:fill="solid" draw:fill-color="#afd095" draw:textarea-horizontal-align="justify" draw:textarea-vertical-align="middle" draw:auto-grow-height="false" fo:min-height="2.038cm" fo:min-width="2.698cm" style:writing-mode="lr-tb" loext:decorative="false"/>
      <style:paragraph-properties style:writing-mode="lr-tb"/>
    </style:style>
    <style:style style:name="gr45" style:family="graphic" style:parent-style-name="objectwithoutfill">
      <style:graphic-properties draw:stroke="dash" draw:stroke-dash="Dot" svg:stroke-width="0.1cm" svg:stroke-color="#729fcf" draw:marker-start-width="0.242cm" draw:marker-end-width="0.242cm" svg:stroke-linecap="butt" draw:fill="none" draw:textarea-vertical-align="middle" fo:padding-top="0.174cm" fo:padding-bottom="0.174cm" fo:padding-left="0.299cm" fo:padding-right="0.299cm" loext:decorative="false"/>
    </style:style>
    <style:style style:name="gr46" style:family="graphic" style:parent-style-name="standard">
      <style:graphic-properties draw:fill="solid" draw:fill-color="#afd095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svg:stroke-color="#ff8000" draw:fill="none" loext:fill-use-slide-background="false" draw:textarea-horizontal-align="center" draw:textarea-vertical-align="bottom" draw:auto-grow-height="false" fo:min-height="8.079cm" fo:min-width="2.783cm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ff8000" draw:fill="none" loext:fill-use-slide-background="false" draw:textarea-horizontal-align="center" draw:textarea-vertical-align="top" draw:auto-grow-height="false" fo:min-height="7.071cm" fo:min-width="2.823cm" style:writing-mode="lr-tb" loext:decorative="false"/>
      <style:paragraph-properties style:writing-mode="lr-tb"/>
    </style:style>
    <style:style style:name="gr49" style:family="graphic" style:parent-style-name="standard">
      <style:graphic-properties svg:stroke-color="#ff8000" draw:fill="none" loext:fill-use-slide-background="false" draw:textarea-horizontal-align="left" draw:textarea-vertical-align="top" draw:auto-grow-height="false" fo:min-height="2.38cm" fo:min-width="10.66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svg:stroke-color="#ff8000" draw:fill="none" loext:fill-use-slide-background="false" draw:textarea-horizontal-align="left" draw:textarea-vertical-align="middle" draw:auto-grow-height="false" fo:min-height="2.316cm" fo:min-width="11.706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ff8000" draw:fill="none" loext:fill-use-slide-background="false" draw:textarea-horizontal-align="justify" draw:textarea-vertical-align="middle" draw:auto-grow-height="false" fo:min-height="3.041cm" fo:min-width="4.002cm" loext:decorative="false"/>
    </style:style>
    <style:style style:name="gr52" style:family="graphic" style:parent-style-name="standard">
      <style:graphic-properties draw:textarea-horizontal-align="justify" draw:textarea-vertical-align="middle" draw:auto-grow-height="false" fo:min-height="2.334cm" fo:min-width="2.514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color="#ff8000" draw:fill="none" loext:fill-use-slide-background="false" draw:textarea-horizontal-align="center" draw:textarea-vertical-align="bottom" draw:auto-grow-height="false" fo:min-height="5.3cm" fo:min-width="4.174cm" style:writing-mode="lr-tb" loext:decorative="false"/>
      <style:paragraph-properties style:writing-mode="lr-tb"/>
    </style:style>
    <style:style style:name="gr54" style:family="graphic" style:parent-style-name="standard">
      <style:graphic-properties draw:fill="solid" draw:fill-color="#cccccc" draw:textarea-horizontal-align="justify" draw:textarea-vertical-align="middle" draw:auto-grow-height="false" fo:min-height="2.038cm" fo:min-width="2.546cm" style:writing-mode="lr-tb" loext:decorative="false"/>
      <style:paragraph-properties style:writing-mode="lr-tb"/>
    </style:style>
    <style:style style:name="gr55" style:family="graphic" style:parent-style-name="objectwithoutfill">
      <style:graphic-properties svg:stroke-color="#cccccc" draw:marker-end="Arrowheads_20_3" draw:marker-end-width="0.3cm" draw:fill="none" loext:decorative="fals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7" style:family="graphic" style:parent-style-name="standard">
      <style:graphic-properties draw:textarea-horizontal-align="justify" draw:textarea-vertical-align="middle" draw:auto-grow-height="false" fo:min-height="1.051cm" fo:min-width="2.067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textarea-horizontal-align="justify" draw:textarea-vertical-align="middle" draw:auto-grow-height="false" fo:min-height="2.634cm" fo:min-width="3.6cm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svg:stroke-width="0.106cm" svg:stroke-color="#ff8000" draw:marker-start-width="0.359cm" draw:marker-end-width="0.359cm" draw:fill="none" loext:fill-use-slide-background="false" draw:textarea-horizontal-align="center" draw:textarea-vertical-align="middle" draw:auto-grow-height="false" fo:min-height="6.83cm" fo:min-width="6.58cm" fo:padding-top="0.178cm" fo:padding-bottom="0.178cm" fo:padding-left="0.303cm" fo:padding-right="0.303cm" fo:wrap-option="wrap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ff8000" draw:fill="none" loext:fill-use-slide-background="false" draw:textarea-horizontal-align="center" draw:textarea-vertical-align="bottom" draw:auto-grow-height="false" fo:min-height="8.079cm" fo:min-width="2.783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svg:stroke-color="#ff8000" draw:fill="none" loext:fill-use-slide-background="false" draw:textarea-horizontal-align="left" draw:textarea-vertical-align="middle" draw:auto-grow-height="false" fo:min-height="2.316cm" fo:min-width="11.706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svg:stroke-color="#ff8000" draw:fill="none" loext:fill-use-slide-background="false" draw:textarea-horizontal-align="center" draw:textarea-vertical-align="bottom" draw:auto-grow-height="false" fo:min-height="5.3cm" fo:min-width="4.174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ff8000" loext:opacity="100%" style:font-name="BlackChancery" fo:font-size="96pt" style:font-size-asian="96pt" style:font-size-complex="96pt"/>
    </style:style>
    <style:style style:name="P2" style:family="paragraph">
      <loext:graphic-properties draw:fill="none"/>
      <style:paragraph-properties fo:text-align="center" style:writing-mode="lr-tb"/>
      <style:text-properties fo:color="#ff8000" loext:opacity="100%" style:font-name="BlackChancery" fo:font-size="96pt" style:font-size-asian="96pt" style:font-size-complex="9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solid" draw:fill-color="#729fc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fo:font-size="12pt"/>
    </style:style>
    <style:style style:name="P7" style:family="paragraph">
      <loext:graphic-properties draw:fill="solid" draw:fill-color="#ec9ba4"/>
      <style:paragraph-properties fo:text-align="center" style:writing-mode="lr-tb"/>
      <style:text-properties fo:font-size="12pt"/>
    </style:style>
    <style:style style:name="P8" style:family="paragraph">
      <loext:graphic-properties draw:fill="solid" draw:fill-color="#ffb66c"/>
      <style:paragraph-properties fo:text-align="center" style:writing-mode="lr-tb"/>
      <style:text-properties fo:font-size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10" style:family="paragraph">
      <loext:graphic-properties draw:fill="solid" draw:fill-color="#afd095" draw:opacity="100%"/>
      <style:paragraph-properties fo:text-align="center" style:writing-mode="lr-tb"/>
      <style:text-properties fo:font-size="12pt"/>
    </style:style>
    <style:style style:name="P11" style:family="paragraph">
      <loext:graphic-properties draw:fill="solid" draw:fill-color="#afd095"/>
      <style:paragraph-properties fo:text-align="center" style:writing-mode="lr-tb"/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3" style:family="paragraph">
      <loext:graphic-properties draw:fill="solid" draw:fill-color="#ec9ba4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4" style:family="paragraph">
      <style:paragraph-properties fo:text-align="righ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right"/>
      <style:text-properties fo:color="#ff8000" loext:opacity="100%"/>
    </style:style>
    <style:style style:name="P17" style:family="paragraph">
      <style:paragraph-properties fo:text-align="center"/>
      <style:text-properties fo:color="#ff8000" loext:opacity="100%" fo:font-size="12pt" style:font-size-asian="12pt" style:font-size-complex="12pt" fo:hyphenate="false" loext:hyphenation-no-caps="false" loext:hyphenation-no-last-word="false"/>
    </style:style>
    <style:style style:name="P18" style:family="paragraph">
      <style:paragraph-properties fo:line-height="100%" fo:text-align="center"/>
      <style:text-properties fo:color="#ff8000" loext:opacity="100%" fo:font-size="12pt" style:font-size-asian="12pt" style:font-size-complex="12pt" fo:hyphenate="false" loext:hyphenation-no-caps="false" loext:hyphenation-no-last-word="false"/>
    </style:style>
    <style:style style:name="P19" style:family="paragraph">
      <loext:graphic-properties draw:fill="none"/>
      <style:paragraph-properties fo:text-align="center" style:writing-mode="lr-tb"/>
      <style:text-properties fo:color="#ff8000" loext:opacity="100%" fo:font-size="12pt" style:font-size-asian="12pt" style:font-size-complex="12pt" fo:hyphenate="false" loext:hyphenation-no-caps="false" loext:hyphenation-no-last-word="false"/>
    </style:style>
    <style:style style:name="P20" style:family="paragraph">
      <style:paragraph-properties fo:text-align="right"/>
      <style:text-properties fo:color="#ff8000" loext:opacity="100%" fo:font-size="10pt" style:font-size-asian="10pt" style:font-size-complex="10pt"/>
    </style:style>
    <style:style style:name="P21" style:family="paragraph">
      <loext:graphic-properties draw:fill="none"/>
      <style:paragraph-properties fo:text-align="right" style:writing-mode="lr-tb"/>
      <style:text-properties fo:color="#ff8000" loext:opacity="100%" fo:font-size="10pt" style:font-size-asian="10pt" style:font-size-complex="10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color="#ff8000" loext:opacity="100%" fo:font-size="10pt" style:font-size-asian="10pt" style:font-size-complex="10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ff8000" loext:opacity="100%" fo:font-size="10pt" style:font-size-asian="10pt" style:font-size-complex="10pt"/>
    </style:style>
    <style:style style:name="P24" style:family="paragraph">
      <style:paragraph-properties fo:text-align="center"/>
      <style:text-properties fo:color="#ff8000" loext:opacity="100%" fo:font-size="10pt" style:font-size-asian="10pt" style:font-size-complex="10pt"/>
    </style:style>
    <style:style style:name="P25" style:family="paragraph">
      <loext:graphic-properties draw:fill="none"/>
      <style:paragraph-properties fo:text-align="center" style:writing-mode="lr-tb"/>
      <style:text-properties fo:color="#ff8000" loext:opacity="100%" fo:font-size="10pt" style:font-size-asian="10pt" style:font-size-complex="10pt"/>
    </style:style>
    <style:style style:name="P26" style:family="paragraph">
      <style:paragraph-properties fo:text-align="left"/>
      <style:text-properties fo:color="#ff8000" loext:opacity="100%" fo:font-size="10pt" style:font-size-asian="10pt" style:font-size-complex="10pt"/>
    </style:style>
    <style:style style:name="P27" style:family="paragraph">
      <loext:graphic-properties draw:fill="none"/>
      <style:paragraph-properties fo:text-align="left" style:writing-mode="lr-tb"/>
      <style:text-properties fo:color="#ff8000" loext:opacity="100%" fo:font-size="10pt" style:font-size-asian="10pt" style:font-size-complex="10pt"/>
    </style:style>
    <style:style style:name="P28" style:family="paragraph">
      <style:paragraph-properties fo:margin-left="0cm" fo:margin-right="0cm" fo:margin-top="0cm" fo:margin-bottom="0cm" fo:line-height="100%" fo:text-align="left" fo:text-indent="0cm"/>
      <style:text-properties fo:color="#ff8000" loext:opacity="100%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left" fo:text-indent="0cm" style:writing-mode="lr-tb"/>
      <style:text-properties fo:color="#ff8000" loext:opacity="100%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fo:font-size="12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fo:font-size="12pt"/>
    </style:style>
    <style:style style:name="P3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3" style:family="paragraph">
      <loext:graphic-properties draw:fill="solid" draw:fill-color="#cccccc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4" style:family="paragraph">
      <style:paragraph-properties fo:text-align="center"/>
      <style:text-properties fo:color="#000000" loext:opacity="100%" style:font-name="BlackChancery" fo:font-size="96pt" style:font-size-asian="96pt" style:font-size-complex="96pt"/>
    </style:style>
    <style:style style:name="P35" style:family="paragraph">
      <loext:graphic-properties draw:fill="none"/>
      <style:paragraph-properties fo:text-align="center" style:writing-mode="lr-tb"/>
      <style:text-properties fo:color="#000000" loext:opacity="100%" style:font-name="BlackChancery" fo:font-size="96pt" style:font-size-asian="96pt" style:font-size-complex="96pt"/>
    </style:style>
    <style:style style:name="P36" style:family="paragraph">
      <loext:graphic-properties draw:fill="none"/>
      <style:paragraph-properties fo:text-align="right"/>
      <style:text-properties fo:color="#000000" loext:opacity="100%"/>
    </style:style>
    <style:style style:name="P37" style:family="paragraph">
      <style:paragraph-properties fo:text-align="center"/>
      <style:text-properties fo:color="#000000" loext:opacity="100%" fo:font-size="12pt" style:font-size-asian="12pt" style:font-size-complex="12pt" fo:hyphenate="false" loext:hyphenation-no-caps="false" loext:hyphenation-no-last-word="false"/>
    </style:style>
    <style:style style:name="P38" style:family="paragraph">
      <style:paragraph-properties fo:line-height="100%" fo:text-align="center"/>
      <style:text-properties fo:color="#000000" loext:opacity="100%" fo:font-size="12pt" style:font-size-asian="12pt" style:font-size-complex="12pt" fo:hyphenate="false" loext:hyphenation-no-caps="false" loext:hyphenation-no-last-word="false"/>
    </style:style>
    <style:style style:name="P39" style:family="paragraph">
      <loext:graphic-properties draw:fill="none"/>
      <style:paragraph-properties fo:text-align="center" style:writing-mode="lr-tb"/>
      <style:text-properties fo:color="#000000" loext:opacity="100%" fo:font-size="12pt" style:font-size-asian="12pt" style:font-size-complex="12pt" fo:hyphenate="false" loext:hyphenation-no-caps="false" loext:hyphenation-no-last-word="false"/>
    </style:style>
    <style:style style:name="P40" style:family="paragraph">
      <style:paragraph-properties fo:text-align="right"/>
      <style:text-properties fo:color="#000000" loext:opacity="100%" fo:font-size="10pt" style:font-size-asian="10pt" style:font-size-complex="10pt"/>
    </style:style>
    <style:style style:name="P41" style:family="paragraph">
      <loext:graphic-properties draw:fill="none"/>
      <style:paragraph-properties fo:text-align="right" style:writing-mode="lr-tb"/>
      <style:text-properties fo:color="#000000" loext:opacity="100%" fo:font-size="10pt" style:font-size-asian="10pt" style:font-size-complex="10pt"/>
    </style:style>
    <style:style style:name="P42" style:family="paragraph">
      <style:paragraph-properties fo:text-align="center"/>
      <style:text-properties fo:color="#000000" loext:opacity="100%" fo:font-size="10pt" style:font-size-asian="10pt" style:font-size-complex="10pt"/>
    </style:style>
    <style:style style:name="P43" style:family="paragraph">
      <loext:graphic-properties draw:fill="none"/>
      <style:paragraph-properties fo:text-align="center" style:writing-mode="lr-tb"/>
      <style:text-properties fo:color="#000000" loext:opacity="100%" fo:font-size="10pt" style:font-size-asian="10pt" style:font-size-complex="10pt"/>
    </style:style>
    <style:style style:name="P44" style:family="paragraph">
      <style:paragraph-properties fo:text-align="left"/>
      <style:text-properties fo:color="#000000" loext:opacity="100%" fo:font-size="10pt" style:font-size-asian="10pt" style:font-size-complex="10pt"/>
    </style:style>
    <style:style style:name="P45" style:family="paragraph">
      <loext:graphic-properties draw:fill="none"/>
      <style:paragraph-properties fo:text-align="left" style:writing-mode="lr-tb"/>
      <style:text-properties fo:color="#000000" loext:opacity="100%" fo:font-size="10pt" style:font-size-asian="10pt" style:font-size-complex="10pt"/>
    </style:style>
    <style:style style:name="P46" style:family="paragraph">
      <style:paragraph-properties fo:margin-left="0cm" fo:margin-right="0cm" fo:margin-top="0cm" fo:margin-bottom="0cm" fo:line-height="100%" fo:text-align="left" fo:text-indent="0cm"/>
      <style:text-properties fo:color="#000000" loext:opacity="100%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left" fo:text-indent="0cm" style:writing-mode="lr-tb"/>
      <style:text-properties fo:color="#000000" loext:opacity="100%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0pt" style:font-size-asian="10pt" style:font-size-complex="10pt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style:font-size-asian="10pt" style:font-size-complex="10pt"/>
    </style:style>
    <style:style style:name="T1" style:family="text">
      <style:text-properties fo:color="#ff8000" loext:opacity="100%" style:font-name="Gabriela Nerd Font" fo:font-size="80pt" style:font-size-asian="80pt" style:font-size-complex="80pt"/>
    </style:style>
    <style:style style:name="T2" style:family="text">
      <style:text-properties fo:color="#ff8000" loext:opacity="100%" style:font-name="BlackChancery" fo:font-size="96pt" style:font-size-asian="96pt" style:font-size-complex="96pt"/>
    </style:style>
    <style:style style:name="T3" style:family="text">
      <style:text-properties fo:font-size="12pt" style:text-underline-style="none" fo:font-weight="bold" style:font-weight-asian="bold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2pt" fo:font-weight="normal" style:font-weight-asian="normal" style:font-weight-complex="normal"/>
    </style:style>
    <style:style style:name="T9" style:family="text">
      <style:text-properties fo:font-size="12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0pt" style:font-weight-asian="normal" style:font-size-complex="10pt" style:font-weight-complex="normal"/>
    </style:style>
    <style:style style:name="T11" style:family="text">
      <style:text-properties fo:font-size="12pt" style:text-underline-style="none" fo:font-weight="normal" style:font-weight-asian="normal" style:font-weight-complex="normal"/>
    </style:style>
    <style:style style:name="T12" style:family="text">
      <style:text-properties fo:font-size="12pt" style:text-underline-style="none" fo:font-weight="bold" style:font-size-asian="10pt" style:font-weight-asian="bold" style:font-size-complex="10pt" style:font-weight-complex="bold"/>
    </style:style>
    <style:style style:name="T13" style:family="text">
      <style:text-properties fo:font-size="12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Gabriela Nerd Font1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8000" loext:opacity="100%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Gabriela Nerd Font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loext:opacity="100%" style:text-outline="false" style:text-line-through-style="none" style:text-line-through-type="none" style:font-name="Gabriela Nerd Font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Gabriela Nerd Font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0000" loext:opacity="100%"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font-variant="normal" fo:text-transform="none" fo:color="#ff8000" loext:opacity="100%" style:text-outline="false" style:text-line-through-style="none" style:text-line-through-type="none" style:font-name="Gabriela Nerd Font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8000" loext:opacity="100%" style:text-outline="false" style:text-line-through-style="none" style:text-line-through-type="none" style:font-name="Gabriela Nerd Font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0000" loext:opacity="100%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ff0000" loext:opacity="100%" fo:font-size="12pt" fo:font-weight="bold" style:font-weight-asian="bold" style:font-weight-complex="bold"/>
    </style:style>
    <style:style style:name="T26" style:family="text">
      <style:text-properties fo:color="#ff8000" loext:opacity="100%" fo:font-size="10pt" style:font-size-asian="10pt" style:font-size-complex="10pt"/>
    </style:style>
    <style:style style:name="T27" style:family="text">
      <style:text-properties fo:color="#ff8000" loext:opacity="100%" fo:font-size="10pt" fo:font-weight="bold" style:font-size-asian="10pt" style:font-weight-asian="bold" style:font-size-complex="10pt" style:font-weight-complex="bold"/>
    </style:style>
    <style:style style:name="T28" style:family="text">
      <style:text-properties style:use-window-font-color="true" loext:opacity="0%" fo:font-size="12pt" fo:font-weight="bold" style:font-size-asian="10pt" style:font-weight-asian="bold" style:font-size-complex="10pt" style:font-weight-complex="bold"/>
    </style:style>
    <style:style style:name="T29" style:family="text">
      <style:text-properties style:use-window-font-color="true" loext:opacity="0%" fo:font-size="10pt" fo:font-weight="normal" style:font-size-asian="10pt" style:font-weight-asian="normal" style:font-size-complex="10pt" style:font-weight-complex="normal"/>
    </style:style>
    <style:style style:name="T30" style:family="text">
      <style:text-properties fo:font-size="10pt" fo:font-weight="bold" style:font-size-asian="10pt" style:font-weight-asian="bold" style:font-size-complex="10pt" style:font-weight-complex="bold"/>
    </style:style>
    <style:style style:name="T31" style:family="text">
      <style:text-properties fo:color="#000000" loext:opacity="100%" style:font-name="Gabriela Nerd Font" fo:font-size="80pt" style:font-size-asian="80pt" style:font-size-complex="80pt"/>
    </style:style>
    <style:style style:name="T32" style:family="text">
      <style:text-properties fo:color="#000000" loext:opacity="100%" style:font-name="BlackChancery" fo:font-size="96pt" style:font-size-asian="96pt" style:font-size-complex="96pt"/>
    </style:style>
    <style:style style:name="T33" style:family="text">
      <style:text-properties fo:color="#000000" loext:opacity="100%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Gabriela Nerd Font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Gabriela Nerd Font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loext:opacity="100%" fo:font-size="10pt" style:font-size-asian="10pt" style:font-size-complex="10pt"/>
    </style:style>
    <style:style style:name="T37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732cm" svg:height="4.762cm" svg:x="74.64cm" svg:y="25.068cm">
          <text:p text:style-name="P1"><text:span text:style-name="T1">1 </text:span><text:span text:style-name="T2">Chronicles</text:span><text:span text:style-name="T1">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curve" svg:x1="77.759cm" svg:y1="46.177cm" svg:x2="72.436cm" svg:y2="48.136cm" draw:start-shape="id1" draw:start-glue-point="2" draw:end-shape="id2" draw:end-glue-point="0" svg:d="M77759 46177c0 1470-5323 491-5323 1959" svg:viewBox="0 0 5324 1960">
          <text:p/>
        </draw:connector>
        <draw:connector draw:style-name="gr2" draw:text-style-name="P3" draw:layer="layout" draw:type="curve" svg:x1="77.759cm" svg:y1="46.177cm" svg:x2="75.936cm" svg:y2="48.136cm" draw:start-shape="id1" draw:start-glue-point="2" draw:end-shape="id3" draw:end-glue-point="0" svg:d="M77759 46177c0 1470-1823 491-1823 1959" svg:viewBox="0 0 1824 1960">
          <text:p/>
        </draw:connector>
        <draw:connector draw:style-name="gr2" draw:text-style-name="P3" draw:layer="layout" draw:type="curve" svg:x1="77.759cm" svg:y1="46.177cm" svg:x2="79.536cm" svg:y2="48.136cm" draw:start-shape="id1" draw:start-glue-point="2" draw:end-shape="id4" draw:end-glue-point="0" svg:d="M77759 46177c0 1470 1777 491 1777 1959" svg:viewBox="0 0 1778 1960">
          <text:p/>
        </draw:connector>
        <draw:connector draw:style-name="gr2" draw:text-style-name="P3" draw:layer="layout" draw:type="curve" svg:x1="77.759cm" svg:y1="46.177cm" svg:x2="83.237cm" svg:y2="48.137cm" draw:start-shape="id1" draw:start-glue-point="2" draw:end-shape="id5" draw:end-glue-point="0" svg:d="M77759 46177c0 1470 5478 490 5478 1960" svg:viewBox="0 0 5479 1961">
          <text:p/>
        </draw:connector>
        <draw:connector draw:style-name="gr3" draw:text-style-name="P3" draw:layer="layout" draw:type="curve" svg:x1="125.706cm" svg:y1="70.327cm" svg:x2="129.384cm" svg:y2="67.979cm" draw:start-shape="id6" draw:start-glue-point="0" draw:end-shape="id7" draw:end-glue-point="2" svg:d="M125706 70327c0-1759 3678-586 3678-2348" svg:viewBox="0 0 3679 2349">
          <text:p/>
        </draw:connector>
        <draw:connector draw:style-name="gr3" draw:text-style-name="P3" draw:layer="layout" draw:type="curve" svg:x1="122.07cm" svg:y1="70.326cm" svg:x2="129.384cm" svg:y2="67.979cm" draw:start-shape="id8" draw:start-glue-point="0" draw:end-shape="id7" draw:end-glue-point="2" svg:d="M122070 70326c0-1759 7314-586 7314-2347" svg:viewBox="0 0 7315 2348">
          <text:p/>
        </draw:connector>
        <draw:connector draw:style-name="gr3" draw:text-style-name="P3" draw:layer="layout" draw:type="curve" svg:x1="129.376cm" svg:y1="70.324cm" svg:x2="129.384cm" svg:y2="67.979cm" draw:start-shape="id9" draw:start-glue-point="0" draw:end-shape="id7" draw:end-glue-point="2" svg:d="M129376 70324c0-1758 8-586 8-2345" svg:viewBox="0 0 9 2346">
          <text:p/>
        </draw:connector>
        <draw:custom-shape draw:style-name="gr4" draw:text-style-name="P5" xml:id="id38" draw:id="id38" draw:layer="layout" svg:width="3.302cm" svg:height="2.54cm" svg:x="120.39cm" svg:y="65.441cm">
          <text:p text:style-name="P4"><text:span text:style-name="T3">Hemath</text:span></text:p>
          <text:p text:style-name="P4"><text:span text:style-name="T4">1Ch 2: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" draw:text-style-name="P3" draw:layer="layout" draw:type="curve" svg:x1="44.153cm" svg:y1="23.993cm" svg:x2="99.576cm" svg:y2="20.835cm" draw:start-shape="id10" draw:start-glue-point="0" draw:end-shape="id11" draw:end-glue-point="2" svg:d="M44153 23993c0-2367 55423-788 55423-3158" svg:viewBox="0 0 55424 3159">
          <text:p/>
        </draw:connector>
        <draw:connector draw:style-name="gr6" draw:text-style-name="P3" draw:layer="layout" draw:type="curve" svg:x1="72.377cm" svg:y1="19.836cm" svg:x2="133.996cm" svg:y2="24.673cm" draw:start-shape="id12" draw:start-glue-point="2" draw:end-shape="id13" draw:end-glue-point="0" svg:d="M72377 19836c0 3628 61619 1210 61619 4837" svg:viewBox="0 0 61620 4838">
          <text:p/>
        </draw:connector>
        <draw:custom-shape draw:style-name="gr7" draw:text-style-name="P6" xml:id="id14" draw:id="id14" draw:layer="layout" svg:width="3.048cm" svg:height="2.54cm" svg:x="81.149cm" svg:y="4.892cm">
          <text:p text:style-name="P4"><text:span text:style-name="T5">Israel</text:span></text:p>
          <text:p text:style-name="P4"><text:span text:style-name="T4">1Ch 2:1</text:span></text:p>
          <text:p text:style-name="P4"><text:span text:style-name="T5">Jacob</text:span></text:p>
          <text:p text:style-name="P4"><text:span text:style-name="T6">Gen 35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4" draw:id="id24" draw:layer="layout" svg:width="3.048cm" svg:height="2.54cm" svg:x="91.75cm" svg:y="13.393cm">
          <text:p text:style-name="P4"><text:span text:style-name="T5">Issachar</text:span></text:p>
          <text:p text:style-name="P4"><text:span text:style-name="T4">1Ch 2:1</text:span></text:p>
          <text:p text:style-name="P4"><text:span text:style-name="T4">Gen 30:17,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9" draw:id="id19" draw:layer="layout" svg:width="3.048cm" svg:height="2.54cm" svg:x="95.15cm" svg:y="13.393cm">
          <text:p text:style-name="P4"><text:span text:style-name="T5">Zebulun</text:span></text:p>
          <text:p text:style-name="P4"><text:span text:style-name="T4">1Ch 2:1</text:span></text:p>
          <text:p text:style-name="P4"><text:span text:style-name="T4">Gen 30:19,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18" draw:id="id18" draw:layer="layout" svg:width="3.048cm" svg:height="2.54cm" svg:x="98.551cm" svg:y="13.394cm">
          <text:p text:style-name="P4"><text:span text:style-name="T5">Dinah</text:span></text:p>
          <text:p text:style-name="P4"><text:span text:style-name="T4">Gen 30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6" draw:id="id26" draw:layer="layout" svg:width="3.048cm" svg:height="2.54cm" svg:x="101.951cm" svg:y="13.394cm">
          <text:p text:style-name="P4"><text:span text:style-name="T5">Joseph</text:span></text:p>
          <text:p text:style-name="P4"><text:span text:style-name="T4">1Ch 2:2</text:span></text:p>
          <text:p text:style-name="P4"><text:span text:style-name="T4">Gen 30:23,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9" draw:id="id29" draw:layer="layout" svg:width="3.048cm" svg:height="2.54cm" svg:x="84.851cm" svg:y="13.394cm">
          <text:p text:style-name="P4"><text:span text:style-name="T5">Gad</text:span></text:p>
          <text:p text:style-name="P4"><text:span text:style-name="T4">1Ch 2:2</text:span></text:p>
          <text:p text:style-name="P4"><text:span text:style-name="T4">Gen 30:10,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1" draw:id="id31" draw:layer="layout" svg:width="3.048cm" svg:height="2.54cm" svg:x="88.251cm" svg:y="13.394cm">
          <text:p text:style-name="P4"><text:span text:style-name="T5">Asher</text:span></text:p>
          <text:p text:style-name="P4"><text:span text:style-name="T4">1Ch 2:2</text:span></text:p>
          <text:p text:style-name="P4"><text:span text:style-name="T4">Gen 30:12,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3" draw:id="id33" draw:layer="layout" svg:width="3.048cm" svg:height="2.54cm" svg:x="77.951cm" svg:y="13.394cm">
          <text:p text:style-name="P4"><text:span text:style-name="T5">Dan</text:span></text:p>
          <text:p text:style-name="P4"><text:span text:style-name="T4">1Ch 2:2</text:span></text:p>
          <text:p text:style-name="P4"><text:span text:style-name="T4">Gen 30:5,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4" draw:id="id34" draw:layer="layout" svg:width="3.048cm" svg:height="2.54cm" svg:x="81.351cm" svg:y="13.394cm">
          <text:p text:style-name="P4"><text:span text:style-name="T5">Naphtali</text:span></text:p>
          <text:p text:style-name="P4"><text:span text:style-name="T4">1Ch 2:2</text:span></text:p>
          <text:p text:style-name="P4"><text:span text:style-name="T4">Gen 30:7,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8" draw:id="id28" draw:layer="layout" svg:width="3.048cm" svg:height="2.54cm" svg:x="105.352cm" svg:y="13.395cm">
          <text:p text:style-name="P4"><text:span text:style-name="T5">Benjamin</text:span></text:p>
          <text:p text:style-name="P4"><text:span text:style-name="T4">1Ch 2:2</text:span></text:p>
          <text:p text:style-name="P4"><text:span text:style-name="T4">Gen 35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1" draw:id="id21" draw:layer="layout" svg:width="3.048cm" svg:height="2.54cm" svg:x="67.152cm" svg:y="13.395cm">
          <text:p text:style-name="P4"><text:span text:style-name="T5">Levi</text:span></text:p>
          <text:p text:style-name="P4"><text:span text:style-name="T4">1Ch 2:1</text:span></text:p>
          <text:p text:style-name="P4"><text:span text:style-name="T4">Gen 29: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2" draw:id="id22" draw:layer="layout" svg:width="3.048cm" svg:height="2.54cm" svg:x="70.852cm" svg:y="13.395cm">
          <text:p text:style-name="P4"><text:span text:style-name="T5">Judah</text:span></text:p>
          <text:p text:style-name="P4"><text:span text:style-name="T4">1Ch 2:1</text:span></text:p>
          <text:p text:style-name="P4"><text:span text:style-name="T4">Gen 29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0" draw:id="id20" draw:layer="layout" svg:width="3.048cm" svg:height="2.54cm" svg:x="60.252cm" svg:y="13.395cm">
          <text:p text:style-name="P4"><text:span text:style-name="T7">Reuben</text:span></text:p>
          <text:p text:style-name="P4"><text:span text:style-name="T4">1Ch 2:1, 5:3</text:span></text:p>
          <text:p text:style-name="P4"><text:span text:style-name="T4">Gen 29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3" draw:id="id23" draw:layer="layout" svg:width="3.048cm" svg:height="2.54cm" svg:x="63.652cm" svg:y="13.395cm">
          <text:p text:style-name="P4"><text:span text:style-name="T5">Simeon</text:span></text:p>
          <text:p text:style-name="P4"><text:span text:style-name="T4">1Ch 2:1</text:span></text:p>
          <text:p text:style-name="P4"><text:span text:style-name="T4">Gen 29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30" draw:id="id30" draw:layer="layout" svg:width="3.048cm" svg:height="2.54cm" svg:x="86.051cm" svg:y="6.294cm">
          <text:p text:style-name="P4"><text:span text:style-name="T5">Zilpah</text:span></text:p>
          <text:p text:style-name="P4"><text:span text:style-name="T4">Gen 30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27" draw:id="id27" draw:layer="layout" svg:width="3.048cm" svg:height="2.54cm" svg:x="90.051cm" svg:y="3.494cm">
          <text:p text:style-name="P4"><text:span text:style-name="T5">Rachel</text:span></text:p>
          <text:p text:style-name="P4"><text:span text:style-name="T4">Gen 30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15" draw:id="id15" draw:layer="layout" svg:width="3.048cm" svg:height="2.54cm" svg:x="72.252cm" svg:y="3.595cm">
          <text:p text:style-name="P4"><text:span text:style-name="T5">Leah</text:span></text:p>
          <text:p text:style-name="P4"><text:span text:style-name="T4">Gen 29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81.149cm" svg:y1="6.162cm" svg:x2="75.3cm" svg:y2="4.865cm" draw:start-shape="id14" draw:start-glue-point="3" draw:end-shape="id15" draw:end-glue-point="1" svg:d="M81149 6162c-4386 0-1462-1297-5849-1297" svg:viewBox="0 0 5850 1298">
          <text:p/>
        </draw:connector>
        <draw:connector draw:style-name="gr6" draw:text-style-name="P3" draw:layer="layout" draw:type="curve" svg:x1="75.976cm" svg:y1="15.935cm" svg:x2="75.977cm" svg:y2="17.296cm" draw:start-shape="id16" draw:start-glue-point="2" draw:end-shape="id17" draw:end-glue-point="0" svg:d="M75976 15935c0 1021 1 341 1 1361" svg:viewBox="0 0 2 1362">
          <text:p/>
        </draw:connector>
        <draw:connector draw:style-name="gr5" draw:text-style-name="P3" draw:layer="layout" draw:type="curve" svg:x1="73.776cm" svg:y1="6.135cm" svg:x2="100.075cm" svg:y2="13.394cm" draw:start-shape="id15" draw:start-glue-point="2" draw:end-shape="id18" draw:end-glue-point="0" svg:d="M73776 6135c0 5445 26299 1816 26299 7259" svg:viewBox="0 0 26300 7260">
          <text:p/>
        </draw:connector>
        <draw:connector draw:style-name="gr5" draw:text-style-name="P3" draw:layer="layout" draw:type="curve" svg:x1="73.776cm" svg:y1="6.135cm" svg:x2="96.674cm" svg:y2="13.393cm" draw:start-shape="id15" draw:start-glue-point="2" draw:end-shape="id19" draw:end-glue-point="0" svg:d="M73776 6135c0 5445 22898 1816 22898 7258" svg:viewBox="0 0 22899 7259">
          <text:p/>
        </draw:connector>
        <draw:connector draw:style-name="gr5" draw:text-style-name="P3" draw:layer="layout" draw:type="curve" svg:x1="61.776cm" svg:y1="13.395cm" svg:x2="73.776cm" svg:y2="6.135cm" draw:start-shape="id20" draw:start-glue-point="0" draw:end-shape="id15" draw:end-glue-point="2" svg:d="M61776 13395c0-5443 12000-1814 12000-7260" svg:viewBox="0 0 12001 7261">
          <text:p/>
        </draw:connector>
        <draw:connector draw:style-name="gr5" draw:text-style-name="P3" draw:layer="layout" draw:type="curve" svg:x1="73.776cm" svg:y1="6.135cm" svg:x2="68.676cm" svg:y2="13.395cm" draw:start-shape="id15" draw:start-glue-point="2" draw:end-shape="id21" draw:end-glue-point="0" svg:d="M73776 6135c0 5446-5100 1817-5100 7260" svg:viewBox="0 0 5101 7261">
          <text:p/>
        </draw:connector>
        <draw:connector draw:style-name="gr5" draw:text-style-name="P3" draw:layer="layout" draw:type="curve" svg:x1="73.776cm" svg:y1="6.135cm" svg:x2="72.376cm" svg:y2="13.395cm" draw:start-shape="id15" draw:start-glue-point="2" draw:end-shape="id22" draw:end-glue-point="0" svg:d="M73776 6135c0 5446-1400 1817-1400 7260" svg:viewBox="0 0 1401 7261">
          <text:p/>
        </draw:connector>
        <draw:connector draw:style-name="gr5" draw:text-style-name="P3" draw:layer="layout" draw:type="curve" svg:x1="73.776cm" svg:y1="6.135cm" svg:x2="65.176cm" svg:y2="13.395cm" draw:start-shape="id15" draw:start-glue-point="2" draw:end-shape="id23" draw:end-glue-point="0" svg:d="M73776 6135c0 5446-8600 1817-8600 7260" svg:viewBox="0 0 8601 7261">
          <text:p/>
        </draw:connector>
        <draw:connector draw:style-name="gr5" draw:text-style-name="P3" draw:layer="layout" draw:type="curve" svg:x1="73.776cm" svg:y1="6.135cm" svg:x2="93.274cm" svg:y2="13.393cm" draw:start-shape="id15" draw:start-glue-point="2" draw:end-shape="id24" draw:end-glue-point="0" svg:d="M73776 6135c0 5445 19498 1816 19498 7258" svg:viewBox="0 0 19499 7259">
          <text:p/>
        </draw:connector>
        <draw:connector draw:style-name="gr6" draw:text-style-name="P3" draw:layer="layout" draw:type="curve" svg:x1="75.976cm" svg:y1="15.935cm" svg:x2="79.476cm" svg:y2="17.295cm" draw:start-shape="id16" draw:start-glue-point="2" draw:end-shape="id25" draw:end-glue-point="0" svg:d="M75976 15935c0 1021 3500 342 3500 1360" svg:viewBox="0 0 3501 1361">
          <text:p/>
        </draw:connector>
        <draw:connector draw:style-name="gr6" draw:text-style-name="P3" draw:layer="layout" draw:type="curve" svg:x1="103.475cm" svg:y1="13.394cm" svg:x2="91.575cm" svg:y2="6.034cm" draw:start-shape="id26" draw:start-glue-point="0" draw:end-shape="id27" svg:d="M103475 13394c0-5518-11900-1839-11900-7360" svg:viewBox="0 0 11901 7361">
          <text:p/>
        </draw:connector>
        <draw:connector draw:style-name="gr6" draw:text-style-name="P3" draw:layer="layout" draw:type="curve" svg:x1="106.876cm" svg:y1="13.395cm" svg:x2="91.575cm" svg:y2="6.034cm" draw:start-shape="id28" draw:start-glue-point="0" draw:end-shape="id27" draw:end-glue-point="2" svg:d="M106876 13395c0-5520-15301-1840-15301-7361" svg:viewBox="0 0 15302 7362">
          <text:p/>
        </draw:connector>
        <draw:connector draw:style-name="gr6" draw:text-style-name="P3" draw:layer="layout" draw:type="curve" svg:x1="86.375cm" svg:y1="13.394cm" svg:x2="87.575cm" svg:y2="8.834cm" draw:start-shape="id29" draw:start-glue-point="0" draw:end-shape="id30" draw:end-glue-point="2" svg:d="M86375 13394c0-3418 1200-1139 1200-4560" svg:viewBox="0 0 1201 4561">
          <text:p/>
        </draw:connector>
        <draw:connector draw:style-name="gr6" draw:text-style-name="P3" draw:layer="layout" draw:type="curve" svg:x1="89.775cm" svg:y1="13.394cm" svg:x2="87.575cm" svg:y2="8.834cm" draw:start-shape="id31" draw:start-glue-point="0" draw:end-shape="id30" draw:end-glue-point="2" svg:d="M89775 13394c0-3418-2200-1139-2200-4560" svg:viewBox="0 0 2201 4561">
          <text:p/>
        </draw:connector>
        <draw:connector draw:style-name="gr9" draw:text-style-name="P3" draw:layer="layout" draw:type="curve" svg:x1="79.4cm" svg:y1="7.565cm" svg:x2="81.149cm" svg:y2="6.162cm" draw:start-shape="id32" draw:start-glue-point="1" draw:end-shape="id14" draw:end-glue-point="3" svg:d="M79400 7565c1312 0 438-1403 1749-1403" svg:viewBox="0 0 1750 1404">
          <text:p/>
        </draw:connector>
        <draw:connector draw:style-name="gr6" draw:text-style-name="P3" draw:layer="layout" draw:type="curve" svg:x1="77.876cm" svg:y1="8.835cm" svg:x2="79.475cm" svg:y2="13.394cm" draw:start-shape="id32" draw:start-glue-point="2" draw:end-shape="id33" draw:end-glue-point="0" svg:d="M77876 8835c0 3420 1599 1141 1599 4559" svg:viewBox="0 0 1600 4560">
          <text:p/>
        </draw:connector>
        <draw:connector draw:style-name="gr6" draw:text-style-name="P3" draw:layer="layout" draw:type="curve" svg:x1="77.876cm" svg:y1="8.835cm" svg:x2="82.875cm" svg:y2="13.394cm" draw:start-shape="id32" draw:start-glue-point="2" draw:end-shape="id34" draw:end-glue-point="0" svg:d="M77876 8835c0 3420 4999 1141 4999 4559" svg:viewBox="0 0 5000 4560">
          <text:p/>
        </draw:connector>
        <draw:connector draw:style-name="gr9" draw:text-style-name="P3" draw:layer="layout" draw:type="curve" svg:x1="86.051cm" svg:y1="7.564cm" svg:x2="84.197cm" svg:y2="6.162cm" draw:start-shape="id30" draw:start-glue-point="3" draw:end-shape="id14" draw:end-glue-point="1" svg:d="M86051 7564c-1389 0-462-1402-1854-1402" svg:viewBox="0 0 1855 1403">
          <text:p/>
        </draw:connector>
        <draw:connector draw:style-name="gr9" draw:text-style-name="P3" draw:layer="layout" draw:type="curve" svg:x1="90.051cm" svg:y1="4.764cm" svg:x2="84.197cm" svg:y2="6.162cm" draw:start-shape="id27" draw:start-glue-point="3" draw:end-shape="id14" draw:end-glue-point="1" svg:d="M90051 4764c-4389 0-1462 1398-5854 1398" svg:viewBox="0 0 5855 1399">
          <text:p/>
        </draw:connector>
        <draw:custom-shape draw:style-name="gr7" draw:text-style-name="P6" xml:id="id25" draw:id="id25" draw:layer="layout" svg:width="3.048cm" svg:height="2.54cm" svg:x="77.952cm" svg:y="17.295cm">
          <text:p text:style-name="P4"><text:span text:style-name="T5">Onan</text:span></text:p>
          <text:p text:style-name="P4"><text:span text:style-name="T4">1Ch 2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7" draw:id="id17" draw:layer="layout" svg:width="3.048cm" svg:height="2.54cm" svg:x="74.453cm" svg:y="17.296cm">
          <text:p text:style-name="P4"><text:span text:style-name="T7">Er</text:span></text:p>
          <text:p text:style-name="P4"><text:span text:style-name="T4">1Ch 2:3</text:span></text:p>
          <text:p text:style-name="P4"><text:span text:style-name="T4">Gen 38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5" draw:id="id35" draw:layer="layout" svg:width="3.048cm" svg:height="2.54cm" svg:x="81.453cm" svg:y="17.296cm">
          <text:p text:style-name="P4"><text:span text:style-name="T5">Shelah</text:span></text:p>
          <text:p text:style-name="P4"><text:span text:style-name="T4">1Ch 2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75.976cm" svg:y1="15.935cm" svg:x2="82.977cm" svg:y2="17.296cm" draw:start-shape="id16" draw:end-shape="id35" draw:end-glue-point="0" svg:d="M75976 15935c0 1021 7001 341 7001 1361" svg:viewBox="0 0 7002 1362">
          <text:p/>
        </draw:connector>
        <draw:custom-shape draw:style-name="gr8" draw:text-style-name="P7" xml:id="id16" draw:id="id16" draw:layer="layout" svg:width="3.048cm" svg:height="2.54cm" svg:x="74.452cm" svg:y="13.395cm">
          <text:p text:style-name="P4"><text:span text:style-name="T5">Unnamed </text:span><text:span text:style-name="T8">Canaanitess</text:span></text:p>
          <text:p text:style-name="P4"><text:span text:style-name="T4">Gen 38:2,12</text:span></text:p>
          <text:p text:style-name="P4"><text:span text:style-name="T4">1Ch 2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7" xml:id="id206" draw:id="id206" draw:layer="layout" svg:width="3.045cm" svg:height="1.571cm" svg:x="72.656cm" svg:y="11.096cm">
          <text:p text:style-name="P4"><text:span text:style-name="T9">Shua</text:span></text:p>
          <text:p text:style-name="P4"><text:span text:style-name="T10">Canaanitess</text:span></text:p>
          <text:p text:style-name="P4"><text:span text:style-name="T10">1Ch 2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72.376cm" svg:y1="15.935cm" svg:x2="72.377cm" svg:y2="17.296cm" draw:start-shape="id22" draw:start-glue-point="2" draw:end-shape="id12" draw:end-glue-point="0" svg:d="M72376 15935c0 1021 1 341 1 1361" svg:viewBox="0 0 2 1362">
          <text:p/>
        </draw:connector>
        <draw:connector draw:style-name="gr9" draw:text-style-name="P3" draw:layer="layout" draw:type="curve" svg:x1="74.452cm" svg:y1="14.665cm" svg:x2="73.9cm" svg:y2="14.665cm" draw:start-shape="id16" draw:start-glue-point="3" draw:end-shape="id22" draw:end-glue-point="1" svg:d="M74452 14665h-552" svg:viewBox="0 0 553 1">
          <text:p/>
        </draw:connector>
        <draw:custom-shape draw:style-name="gr8" draw:text-style-name="P7" xml:id="id12" draw:id="id12" draw:layer="layout" svg:width="3.048cm" svg:height="2.54cm" svg:x="70.853cm" svg:y="17.296cm">
          <text:p text:style-name="P4"><text:span text:style-name="T5">Tamar</text:span></text:p>
          <text:p text:style-name="P4"><text:span text:style-name="T4">1Ch 2:4</text:span></text:p>
          <text:p text:style-name="P4"><text:span text:style-name="T4">Gen 38:24-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6" xml:id="id36" draw:id="id36" draw:layer="layout" svg:width="3.099cm" svg:height="2.54cm" svg:x="101.936cm" svg:y="18.295cm">
          <text:p text:style-name="P4"><text:span text:style-name="T7">Manasseh</text:span></text:p>
          <text:p text:style-name="P4"><text:span text:style-name="T4">Num 26:28,29</text:span></text:p>
          <text:p text:style-name="P4"><text:span text:style-name="T4">Jos 17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103.485cm" svg:y1="18.295cm" svg:x2="103.475cm" svg:y2="15.934cm" draw:start-shape="id36" draw:start-glue-point="0" draw:end-shape="id26" draw:end-glue-point="2" svg:d="M103485 18295c0-1770-10-590-10-2361" svg:viewBox="0 0 11 2362">
          <text:p/>
        </draw:connector>
        <draw:custom-shape draw:style-name="gr8" draw:text-style-name="P7" xml:id="id11" draw:id="id11" draw:layer="layout" svg:width="3.048cm" svg:height="2.54cm" svg:x="98.052cm" svg:y="18.295cm">
          <text:p text:style-name="P4"><text:span text:style-name="T5">Concubine</text:span></text:p>
          <text:p text:style-name="P4"><text:span text:style-name="T4">the Aramitess</text:span></text:p>
          <text:p text:style-name="P4"><text:span text:style-name="T4">(Syrian)</text:span></text:p>
          <text:p text:style-name="P4"><text:span text:style-name="T4">1Ch 7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101.936cm" svg:y1="19.565cm" svg:x2="101.1cm" svg:y2="19.565cm" draw:start-shape="id36" draw:start-glue-point="3" draw:end-shape="id11" draw:end-glue-point="1" svg:d="M101936 19565h-836" svg:viewBox="0 0 837 1">
          <text:p/>
        </draw:connector>
        <draw:connector draw:style-name="gr12" draw:text-style-name="P3" draw:layer="layout" draw:type="curve" svg:x1="74.453cm" svg:y1="18.566cm" svg:x2="73.901cm" svg:y2="18.566cm" draw:start-shape="id17" draw:start-glue-point="3" draw:end-shape="id12" draw:end-glue-point="1" svg:d="M74453 18566h-552" svg:viewBox="0 0 553 1">
          <text:p/>
        </draw:connector>
        <draw:connector draw:style-name="gr6" draw:text-style-name="P3" draw:layer="layout" draw:type="curve" svg:x1="48.314cm" svg:y1="23.997cm" svg:x2="72.377cm" svg:y2="19.836cm" draw:start-shape="id37" draw:start-glue-point="0" draw:end-shape="id12" svg:d="M48314 23997c0-3120 24063-1040 24063-4161" svg:viewBox="0 0 24064 4162">
          <text:p/>
        </draw:connector>
        <draw:custom-shape draw:style-name="gr13" draw:text-style-name="P8" xml:id="id9" draw:id="id9" draw:layer="layout" svg:width="3.048cm" svg:height="2.54cm" svg:x="127.852cm" svg:y="70.324cm">
          <text:p text:style-name="P4"><text:span text:style-name="T5">Suchathites</text:span></text:p>
          <text:p text:style-name="P4"><text:span text:style-name="T4">1Ch 2: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8" xml:id="id8" draw:id="id8" draw:layer="layout" svg:width="3.048cm" svg:height="2.54cm" svg:x="120.546cm" svg:y="70.326cm">
          <text:p text:style-name="P4"><text:span text:style-name="T5">Tirathites</text:span></text:p>
          <text:p text:style-name="P4"><text:span text:style-name="T4">1Ch 2: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8" xml:id="id6" draw:id="id6" draw:layer="layout" svg:width="3.302cm" svg:height="2.54cm" svg:x="124.055cm" svg:y="70.327cm">
          <text:p text:style-name="P4"><text:span text:style-name="T3">Shimeathites</text:span></text:p>
          <text:p text:style-name="P4"><text:span text:style-name="T4">1Ch 2: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" draw:text-style-name="P3" draw:layer="layout" draw:type="curve" svg:x1="122.041cm" svg:y1="67.981cm" svg:x2="122.07cm" svg:y2="70.326cm" draw:start-shape="id38" draw:start-glue-point="2" draw:end-shape="id8" draw:end-glue-point="0" svg:d="M122041 67981c0 1759 29 587 29 2345" svg:viewBox="0 0 30 2346">
          <text:p/>
        </draw:connector>
        <draw:connector draw:style-name="gr15" draw:text-style-name="P3" draw:layer="layout" draw:type="curve" svg:x1="122.041cm" svg:y1="67.981cm" svg:x2="125.706cm" svg:y2="70.327cm" draw:start-shape="id38" draw:start-glue-point="2" draw:end-shape="id6" draw:end-glue-point="0" svg:d="M122041 67981c0 1761 3665 588 3665 2346" svg:viewBox="0 0 3666 2347">
          <text:p/>
        </draw:connector>
        <draw:connector draw:style-name="gr15" draw:text-style-name="P3" draw:layer="layout" draw:type="curve" svg:x1="122.041cm" svg:y1="67.981cm" svg:x2="129.376cm" svg:y2="70.324cm" draw:start-shape="id38" draw:start-glue-point="2" draw:end-shape="id9" draw:end-glue-point="0" svg:d="M122041 67981c0 1758 7335 587 7335 2343" svg:viewBox="0 0 7336 2344">
          <text:p/>
        </draw:connector>
        <draw:connector draw:style-name="gr6" draw:text-style-name="P3" draw:layer="layout" draw:type="curve" svg:x1="44.923cm" svg:y1="62.099cm" svg:x2="48.334cm" svg:y2="56.341cm" draw:start-shape="id39" draw:start-glue-point="0" draw:end-shape="id40" draw:end-glue-point="2" svg:d="M44923 62099c0-4317 3411-1438 3411-5758" svg:viewBox="0 0 3412 5759">
          <text:p/>
        </draw:connector>
        <draw:connector draw:style-name="gr6" draw:text-style-name="P3" draw:layer="layout" draw:type="curve" svg:x1="48.324cm" svg:y1="62.1cm" svg:x2="48.334cm" svg:y2="56.341cm" draw:start-shape="id41" draw:start-glue-point="0" draw:end-shape="id40" draw:end-glue-point="2" svg:d="M48324 62100c0-4318 10-1439 10-5759" svg:viewBox="0 0 11 5760">
          <text:p/>
        </draw:connector>
        <draw:custom-shape draw:style-name="gr8" draw:text-style-name="P7" xml:id="id42" draw:id="id42" draw:layer="layout" svg:width="3.048cm" svg:height="2.54cm" svg:x="72.103cm" svg:y="32.933cm">
          <text:p text:style-name="P4"><text:span text:style-name="T5">Azubah</text:span></text:p>
          <text:p text:style-name="P4"><text:span text:style-name="T4">1Ch 2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72.103cm" svg:y1="34.203cm" svg:x2="71.527cm" svg:y2="34.2cm" draw:start-shape="id42" draw:start-glue-point="3" draw:end-shape="id43" draw:end-glue-point="1" svg:d="M72103 34203c-430 0-143-3-576-3" svg:viewBox="0 0 577 4">
          <text:p/>
        </draw:connector>
        <draw:connector draw:style-name="gr6" draw:text-style-name="P3" draw:layer="layout" draw:type="curve" svg:x1="65.206cm" svg:y1="35.474cm" svg:x2="58.112cm" svg:y2="38.334cm" draw:start-shape="id44" draw:start-glue-point="2" draw:end-shape="id45" draw:end-glue-point="0" svg:d="M65206 35474c0 2146-7094 717-7094 2860" svg:viewBox="0 0 7095 2861">
          <text:p/>
        </draw:connector>
        <draw:connector draw:style-name="gr6" draw:text-style-name="P3" draw:layer="layout" draw:type="curve" svg:x1="65.206cm" svg:y1="35.474cm" svg:x2="61.713cm" svg:y2="38.335cm" draw:start-shape="id44" draw:start-glue-point="2" draw:end-shape="id46" draw:end-glue-point="0" svg:d="M65206 35474c0 2146-3493 716-3493 2861" svg:viewBox="0 0 3494 2862">
          <text:p/>
        </draw:connector>
        <draw:connector draw:style-name="gr6" draw:text-style-name="P3" draw:layer="layout" draw:type="curve" svg:x1="65.206cm" svg:y1="35.474cm" svg:x2="65.213cm" svg:y2="38.335cm" draw:start-shape="id44" draw:start-glue-point="2" draw:end-shape="id47" draw:end-glue-point="0" svg:d="M65206 35474c0 2146 7 716 7 2861" svg:viewBox="0 0 8 2862">
          <text:p/>
        </draw:connector>
        <draw:connector draw:style-name="gr9" draw:text-style-name="P3" draw:layer="layout" draw:type="curve" draw:line-skew="2.449cm" svg:x1="86.199cm" svg:y1="34.228cm" svg:x2="69.444cm" svg:y2="32.6cm" draw:start-shape="id48" draw:start-glue-point="3" draw:end-shape="id43" draw:end-glue-point="0" svg:d="M86199 34228c-7329 0-6107-1065-8464-1660s-8291-719-8291 32" svg:viewBox="0 0 16756 2150">
          <text:p/>
        </draw:connector>
        <draw:custom-shape draw:style-name="gr7" draw:text-style-name="P6" xml:id="id45" draw:id="id45" draw:layer="layout" svg:width="3.048cm" svg:height="2.54cm" svg:x="56.588cm" svg:y="38.334cm">
          <text:p text:style-name="P4"><text:span text:style-name="T5">Jesher</text:span></text:p>
          <text:p text:style-name="P4"><text:span text:style-name="T4">1Ch 2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46" draw:id="id46" draw:layer="layout" svg:width="3.048cm" svg:height="2.54cm" svg:x="60.189cm" svg:y="38.335cm">
          <text:p text:style-name="P4"><text:span text:style-name="T5">Shobab</text:span></text:p>
          <text:p text:style-name="P4"><text:span text:style-name="T4">1Ch 2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47" draw:id="id47" draw:layer="layout" svg:width="3.048cm" svg:height="2.54cm" svg:x="63.689cm" svg:y="38.335cm">
          <text:p text:style-name="P4"><text:span text:style-name="T5">Ardon</text:span></text:p>
          <text:p text:style-name="P4"><text:span text:style-name="T4">1Ch 2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77.76cm" svg:y1="38.336cm" svg:x2="73.627cm" svg:y2="35.473cm" draw:start-shape="id49" draw:start-glue-point="0" draw:end-shape="id42" draw:end-glue-point="2" svg:d="M77760 38336c0-2146-4133-715-4133-2863" svg:viewBox="0 0 4134 2864">
          <text:p/>
        </draw:connector>
        <draw:custom-shape draw:style-name="gr7" draw:text-style-name="P6" xml:id="id50" draw:id="id50" draw:layer="layout" svg:width="3.048cm" svg:height="2.54cm" svg:x="72.135cm" svg:y="38.335cm">
          <text:p text:style-name="P4"><text:span text:style-name="T7">Mesha</text:span></text:p>
          <text:p text:style-name="P4"><text:span text:style-name="T4">1Ch 2: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49" draw:id="id49" draw:layer="layout" svg:width="3.048cm" svg:height="2.54cm" svg:x="76.236cm" svg:y="38.336cm">
          <text:p text:style-name="P4"><text:span text:style-name="T5">Mareshah</text:span></text:p>
          <text:p text:style-name="P4"><text:span text:style-name="T4">1Ch 2: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73.659cm" svg:y1="38.335cm" svg:x2="73.627cm" svg:y2="35.473cm" draw:start-shape="id50" draw:start-glue-point="0" draw:end-shape="id42" draw:end-glue-point="2" svg:d="M73659 38335c0-2145-32-714-32-2862" svg:viewBox="0 0 33 2863">
          <text:p/>
        </draw:connector>
        <draw:custom-shape draw:style-name="gr8" draw:text-style-name="P7" xml:id="id44" draw:id="id44" draw:layer="layout" svg:width="3.048cm" svg:height="2.54cm" svg:x="63.682cm" svg:y="32.934cm">
          <text:p text:style-name="P4"><text:span text:style-name="T5">Jerioth</text:span></text:p>
          <text:p text:style-name="P4"><text:span text:style-name="T4">1Ch 2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66.73cm" svg:y1="34.204cm" svg:x2="67.361cm" svg:y2="34.2cm" draw:start-shape="id44" draw:start-glue-point="1" draw:end-shape="id43" draw:end-glue-point="3" svg:d="M66730 34204c474 0 159-4 631-4" svg:viewBox="0 0 632 5">
          <text:p/>
        </draw:connector>
        <draw:custom-shape draw:style-name="gr16" draw:text-style-name="P10" xml:id="id51" draw:id="id51" draw:layer="layout" svg:width="3.962cm" svg:height="4.318cm" svg:x="71.683cm" svg:y="41.906cm">
          <text:p text:style-name="P4"><text:span text:style-name="T3">Ziph</text:span><text:span text:style-name="T11"> 1</text:span></text:p>
          <text:p text:style-name="P4"><text:span text:style-name="T4">Jos 15:21,24</text:span></text:p>
          <text:p text:style-name="P9"><text:span text:style-name="T12">Ziph</text:span><text:span text:style-name="T13"> 2</text:span></text:p>
          <text:p text:style-name="P9"><text:span text:style-name="T4">Jos 15:48,55</text:span></text:p>
          <text:p text:style-name="P9"><text:span text:style-name="T14">Ziph</text:span><text:span text:style-name="T15"> 1 or 2</text:span></text:p>
          <text:p text:style-name="P9"><text:span text:style-name="T4">1Ch 2:42</text:span></text:p>
          <text:p text:style-name="P9"><text:span text:style-name="T4">2Ch 11:5,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7" draw:text-style-name="P3" draw:layer="layout" draw:type="curve" svg:x1="73.659cm" svg:y1="40.875cm" svg:x2="73.664cm" svg:y2="41.906cm" draw:start-shape="id50" draw:start-glue-point="2" draw:end-shape="id51" draw:end-glue-point="0" svg:d="M73659 40875c0 774 5 259 5 1031" svg:viewBox="0 0 6 1032">
          <text:p/>
        </draw:connector>
        <draw:custom-shape draw:style-name="gr18" draw:text-style-name="P5" xml:id="id1" draw:id="id1" draw:layer="layout" svg:width="3.251cm" svg:height="2.591cm" svg:x="76.134cm" svg:y="43.586cm">
          <text:p text:style-name="P4"><text:span text:style-name="T5">Hebron</text:span></text:p>
          <text:p text:style-name="P4"><text:span text:style-name="T4">1Ch 2:42,4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77.76cm" svg:y1="40.876cm" svg:x2="77.759cm" svg:y2="43.586cm" draw:start-shape="id49" draw:start-glue-point="2" draw:end-shape="id1" draw:end-glue-point="0" svg:d="M77760 40876c0 2032-1 678-1 2710" svg:viewBox="0 0 2 2711">
          <text:p/>
        </draw:connector>
        <draw:custom-shape draw:style-name="gr7" draw:text-style-name="P6" xml:id="id2" draw:id="id2" draw:layer="layout" svg:width="3.048cm" svg:height="2.54cm" svg:x="70.912cm" svg:y="48.136cm">
          <text:p text:style-name="P4"><text:span text:style-name="T5">Korah</text:span></text:p>
          <text:p text:style-name="P4"><text:span text:style-name="T4">1Ch 2:4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" draw:id="id3" draw:layer="layout" svg:width="3.048cm" svg:height="2.54cm" svg:x="74.412cm" svg:y="48.136cm">
          <text:p text:style-name="P4"><text:span text:style-name="T5">Tappuah</text:span></text:p>
          <text:p text:style-name="P4"><text:span text:style-name="T4">1Ch 2:4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4" draw:id="id4" draw:layer="layout" svg:width="3.048cm" svg:height="2.54cm" svg:x="78.012cm" svg:y="48.136cm">
          <text:p text:style-name="P4"><text:span text:style-name="T3">Rekem</text:span></text:p>
          <text:p text:style-name="P4"><text:span text:style-name="T4">1Ch 2:4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5" draw:id="id5" draw:layer="layout" svg:width="3.048cm" svg:height="2.54cm" svg:x="81.713cm" svg:y="48.137cm">
          <text:p text:style-name="P4"><text:span text:style-name="T5">Shema</text:span></text:p>
          <text:p text:style-name="P4"><text:span text:style-name="T4">1Ch 2:4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53" draw:id="id53" draw:layer="layout" svg:width="3.048cm" svg:height="2.54cm" svg:x="81.714cm" svg:y="51.438cm">
          <text:p text:style-name="P4"><text:span text:style-name="T5">Raham</text:span></text:p>
          <text:p text:style-name="P4"><text:span text:style-name="T4">1Ch 2:4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52" draw:id="id52" draw:layer="layout" svg:width="3.048cm" svg:height="2.54cm" svg:x="78.013cm" svg:y="51.437cm">
          <text:p text:style-name="P4"><text:span text:style-name="T3">Shammai</text:span></text:p>
          <text:p text:style-name="P4"><text:span text:style-name="T4">1Ch 2:4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79.536cm" svg:y1="50.676cm" svg:x2="79.537cm" svg:y2="51.437cm" draw:start-shape="id4" draw:start-glue-point="2" draw:end-shape="id52" draw:end-glue-point="0" svg:d="M79536 50676c0 571 1 191 1 761" svg:viewBox="0 0 2 762">
          <text:p/>
        </draw:connector>
        <draw:connector draw:style-name="gr6" draw:text-style-name="P3" draw:layer="layout" draw:type="curve" svg:x1="83.237cm" svg:y1="50.677cm" svg:x2="83.238cm" svg:y2="51.438cm" draw:start-shape="id5" draw:start-glue-point="2" draw:end-shape="id53" draw:end-glue-point="0" svg:d="M83237 50677c0 571 1 191 1 761" svg:viewBox="0 0 2 762">
          <text:p/>
        </draw:connector>
        <draw:custom-shape draw:style-name="gr19" draw:text-style-name="P5" xml:id="id54" draw:id="id54" draw:layer="layout" svg:width="3.048cm" svg:height="2.54cm" svg:x="81.716cm" svg:y="54.732cm">
          <text:p text:style-name="P4"><text:span text:style-name="T5">Jorkoam</text:span></text:p>
          <text:p text:style-name="P4"><text:span text:style-name="T4">1Ch 2:4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7" draw:text-style-name="P3" draw:layer="layout" draw:type="curve" svg:x1="83.24cm" svg:y1="54.732cm" svg:x2="83.238cm" svg:y2="53.978cm" draw:start-shape="id54" draw:start-glue-point="0" draw:end-shape="id53" draw:end-glue-point="2" svg:d="M83240 54732c0-564-2-187-2-754" svg:viewBox="0 0 3 755">
          <text:p/>
        </draw:connector>
        <draw:custom-shape draw:style-name="gr7" draw:text-style-name="P6" xml:id="id55" draw:id="id55" draw:layer="layout" svg:width="3.048cm" svg:height="2.54cm" svg:x="78.014cm" svg:y="54.738cm">
          <text:p text:style-name="P4"><text:span text:style-name="T3">Maon</text:span></text:p>
          <text:p text:style-name="P4"><text:span text:style-name="T4">1Ch 2:4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79.538cm" svg:y1="54.738cm" svg:x2="79.537cm" svg:y2="53.977cm" draw:start-shape="id55" draw:start-glue-point="0" draw:end-shape="id52" draw:end-glue-point="2" svg:d="M79538 54738c0-570-1-190-1-761" svg:viewBox="0 0 2 762">
          <text:p/>
        </draw:connector>
        <draw:custom-shape draw:style-name="gr20" draw:text-style-name="P11" xml:id="id56" draw:id="id56" draw:layer="layout" svg:width="3.353cm" svg:height="3.505cm" svg:x="77.862cm" svg:y="58.086cm">
          <text:p text:style-name="P4"><text:span text:style-name="T5">Beth-zur</text:span></text:p>
          <text:p text:style-name="P4"><text:span text:style-name="T4">1Ch 2:45</text:span></text:p>
          <text:p text:style-name="P9"><text:span text:style-name="T9">Bethzur</text:span></text:p>
          <text:p text:style-name="P9"><text:span text:style-name="T4">Jos 15:20,48,58</text:span></text:p>
          <text:p text:style-name="P9"><text:span text:style-name="T4">2Ch 11:5,7</text:span></text:p>
          <text:p text:style-name="P9"><text:span text:style-name="T4">Neh 3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1" draw:text-style-name="P3" draw:layer="layout" draw:type="curve" svg:x1="79.538cm" svg:y1="57.278cm" svg:x2="79.538cm" svg:y2="58.086cm" draw:start-shape="id55" draw:start-glue-point="2" draw:end-shape="id56" draw:end-glue-point="0" svg:d="M79538 57278v808" svg:viewBox="0 0 1 809">
          <text:p/>
        </draw:connector>
        <draw:connector draw:style-name="gr9" draw:text-style-name="P3" draw:layer="layout" draw:type="curve" draw:line-skew="11.558cm" svg:x1="97.396cm" svg:y1="34.205cm" svg:x2="69.444cm" svg:y2="32.6cm" draw:start-shape="id57" draw:start-glue-point="3" draw:end-shape="id43" draw:end-glue-point="0" svg:d="M97396 34205c-2064 0-1720-1053-8192-1642s-19760-714-19760 37" svg:viewBox="0 0 27953 2128">
          <text:p/>
        </draw:connector>
        <draw:custom-shape draw:style-name="gr8" draw:text-style-name="P7" xml:id="id57" draw:id="id57" draw:layer="layout" svg:width="3.048cm" svg:height="2.54cm" svg:x="97.396cm" svg:y="32.935cm">
          <text:p text:style-name="P4"><text:span text:style-name="T5">Ephah</text:span></text:p>
          <text:p text:style-name="P4"><text:span text:style-name="T8">concubine</text:span></text:p>
          <text:p text:style-name="P4"><text:span text:style-name="T4">1Ch 2:4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59" draw:id="id59" draw:layer="layout" svg:width="3.048cm" svg:height="2.54cm" svg:x="97.412cm" svg:y="38.136cm">
          <text:p text:style-name="P4"><text:span text:style-name="T5">Haran</text:span></text:p>
          <text:p text:style-name="P4"><text:span text:style-name="T4">1Ch 2:4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58" draw:id="id58" draw:layer="layout" svg:width="3.048cm" svg:height="2.54cm" svg:x="100.912cm" svg:y="38.136cm">
          <text:p text:style-name="P4"><text:span text:style-name="T5">Moza</text:span></text:p>
          <text:p text:style-name="P4"><text:span text:style-name="T4">1Ch 2:4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98.92cm" svg:y1="35.475cm" svg:x2="102.436cm" svg:y2="38.136cm" draw:start-shape="id57" draw:start-glue-point="2" draw:end-shape="id58" draw:end-glue-point="0" svg:d="M98920 35475c0 1996 3516 666 3516 2661" svg:viewBox="0 0 3517 2662">
          <text:p/>
        </draw:connector>
        <draw:connector draw:style-name="gr6" draw:text-style-name="P3" draw:layer="layout" draw:type="curve" svg:x1="98.936cm" svg:y1="38.136cm" svg:x2="98.92cm" svg:y2="35.475cm" draw:start-shape="id59" draw:start-glue-point="0" draw:end-shape="id57" draw:end-glue-point="2" svg:d="M98936 38136c0-1995-16-665-16-2661" svg:viewBox="0 0 17 2662">
          <text:p/>
        </draw:connector>
        <draw:custom-shape draw:style-name="gr7" draw:text-style-name="P6" xml:id="id60" draw:id="id60" draw:layer="layout" svg:width="3.048cm" svg:height="2.54cm" svg:x="104.413cm" svg:y="38.137cm">
          <text:p text:style-name="P4"><text:span text:style-name="T5">Gazez</text:span></text:p>
          <text:p text:style-name="P4"><text:span text:style-name="T4">1Ch 2:4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98.92cm" svg:y1="35.475cm" svg:x2="105.937cm" svg:y2="38.137cm" draw:start-shape="id57" draw:start-glue-point="2" draw:end-shape="id60" draw:end-glue-point="0" svg:d="M98920 35475c0 1998 7017 667 7017 2662" svg:viewBox="0 0 7018 2663">
          <text:p/>
        </draw:connector>
        <draw:custom-shape draw:style-name="gr7" draw:text-style-name="P6" xml:id="id61" draw:id="id61" draw:layer="layout" svg:width="3.048cm" svg:height="2.54cm" svg:x="97.414cm" svg:y="41.673cm">
          <text:p text:style-name="P4"><text:span text:style-name="T5">Gazez</text:span></text:p>
          <text:p text:style-name="P4"><text:span text:style-name="T4">1Ch 2:4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98.936cm" svg:y1="40.676cm" svg:x2="98.938cm" svg:y2="41.673cm" draw:start-shape="id59" draw:start-glue-point="2" draw:end-shape="id61" draw:end-glue-point="0" svg:d="M98936 40676c0 748 2 250 2 997" svg:viewBox="0 0 3 998">
          <text:p/>
        </draw:connector>
        <draw:connector draw:style-name="gr9" draw:text-style-name="P3" draw:layer="layout" draw:type="curve" draw:line-skew="17.203cm" svg:x1="108.505cm" svg:y1="34.287cm" svg:x2="69.444cm" svg:y2="32.6cm" draw:start-shape="id62" draw:start-glue-point="3" draw:end-shape="id43" draw:end-glue-point="0" svg:d="M108505 34287c-1927 0-1605-1094-10889-1704s-28172-734-28172 17" svg:viewBox="0 0 39062 2207">
          <text:p/>
        </draw:connector>
        <draw:custom-shape draw:style-name="gr22" draw:text-style-name="P12" xml:id="id43" draw:id="id43" draw:layer="layout" svg:width="4.166cm" svg:height="3.2cm" svg:x="67.361cm" svg:y="32.6cm">
          <text:p text:style-name="P9"><text:span text:style-name="T9">Chelubai</text:span></text:p>
          <text:p text:style-name="P9"><text:span text:style-name="T4">1Ch 2:9</text:span></text:p>
          <text:p text:style-name="P9"><text:span text:style-name="T9">Caleb</text:span></text:p>
          <text:p text:style-name="P9"><text:span text:style-name="T4">1Ch 2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63" draw:id="id63" draw:layer="layout" svg:width="3.048cm" svg:height="2.54cm" svg:x="61.879cm" svg:y="62.137cm">
          <text:p text:style-name="P4"><text:span text:style-name="T5">Nabal</text:span></text:p>
          <text:p text:style-name="P4"><text:span text:style-name="T4">1Sa 25:2,3, 30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64" draw:id="id64" draw:layer="layout" svg:width="3.048cm" svg:height="2.54cm" svg:x="58.18cm" svg:y="62.138cm">
          <text:p text:style-name="P4"><text:span text:style-name="T5">Abigail</text:span></text:p>
          <text:p text:style-name="P4"><text:span text:style-name="T4">1Sa 25:3, 27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" draw:text-style-name="P3" draw:layer="layout" draw:type="curve" svg:x1="61.879cm" svg:y1="63.407cm" svg:x2="61.228cm" svg:y2="63.408cm" draw:start-shape="id63" draw:start-glue-point="3" draw:end-shape="id64" draw:end-glue-point="1" svg:d="M61879 63407c-487 0-162 1-651 1" svg:viewBox="0 0 652 2">
          <text:p/>
        </draw:connector>
        <draw:connector draw:style-name="gr2" draw:text-style-name="P3" draw:layer="layout" draw:type="curve" draw:line-skew="3.278cm" svg:x1="63.403cm" svg:y1="62.137cm" svg:x2="69.444cm" svg:y2="35.8cm" draw:start-shape="id63" draw:start-glue-point="0" draw:end-shape="id43" draw:end-glue-point="2" svg:d="M63403 62137c0-14835 6041-1667 6041-26337" svg:viewBox="0 0 6042 26338">
          <text:p/>
        </draw:connector>
        <draw:connector draw:style-name="gr23" draw:text-style-name="P3" draw:layer="layout" draw:type="curve" svg:x1="48.314cm" svg:y1="27.096cm" svg:x2="48.331cm" svg:y2="28.098cm" draw:start-shape="id37" draw:start-glue-point="2" draw:end-shape="id65" draw:end-glue-point="0" svg:d="M48314 27096c0 751 17 251 17 1002" svg:viewBox="0 0 18 1003">
          <text:p/>
        </draw:connector>
        <draw:connector draw:style-name="gr2" draw:text-style-name="P3" draw:layer="layout" draw:type="curve" svg:x1="48.314cm" svg:y1="27.096cm" svg:x2="56.514cm" svg:y2="28.104cm" draw:start-shape="id37" draw:start-glue-point="2" draw:end-shape="id66" draw:end-glue-point="0" svg:d="M48314 27096c0 756 8200 252 8200 1008" svg:viewBox="0 0 8201 1009">
          <text:p/>
        </draw:connector>
        <draw:connector draw:style-name="gr2" draw:text-style-name="P3" draw:layer="layout" draw:type="curve" svg:x1="44.155cm" svg:y1="28.097cm" svg:x2="44.153cm" svg:y2="26.635cm" draw:start-shape="id67" draw:start-glue-point="0" draw:end-shape="id10" draw:end-glue-point="2" svg:d="M44155 28097c0-1095-2-364-2-1462" svg:viewBox="0 0 3 1463">
          <text:p/>
        </draw:connector>
        <draw:connector draw:style-name="gr6" draw:text-style-name="P3" draw:layer="layout" draw:type="curve" svg:x1="48.333cm" svg:y1="43.3cm" svg:x2="48.332cm" svg:y2="42.539cm" draw:start-shape="id68" draw:start-glue-point="0" draw:end-shape="id69" draw:end-glue-point="2" svg:d="M48333 43300c0-570-1-190-1-761" svg:viewBox="0 0 2 762">
          <text:p/>
        </draw:connector>
        <draw:connector draw:style-name="gr23" draw:text-style-name="P3" draw:layer="layout" draw:type="curve" svg:x1="48.331cm" svg:y1="30.638cm" svg:x2="48.331cm" svg:y2="32.498cm" draw:start-shape="id65" draw:start-glue-point="2" draw:end-shape="id70" draw:end-glue-point="0" svg:d="M48331 30638v1860" svg:viewBox="0 0 1 1861">
          <text:p/>
        </draw:connector>
        <draw:connector draw:style-name="gr6" draw:text-style-name="P3" draw:layer="layout" draw:type="curve" svg:x1="48.333cm" svg:y1="46.9cm" svg:x2="44.434cm" svg:y2="45.841cm" draw:start-shape="id71" draw:start-glue-point="0" draw:end-shape="id72" draw:end-glue-point="2" svg:d="M48333 46900c0-793-3899-264-3899-1059" svg:viewBox="0 0 3900 1060">
          <text:p/>
        </draw:connector>
        <draw:connector draw:style-name="gr6" draw:text-style-name="P3" draw:layer="layout" draw:type="curve" svg:x1="48.333cm" svg:y1="50.5cm" svg:x2="44.435cm" svg:y2="49.442cm" draw:start-shape="id73" draw:start-glue-point="0" draw:end-shape="id74" draw:end-glue-point="2" svg:d="M48333 50500c0-792-3898-263-3898-1058" svg:viewBox="0 0 3899 1059">
          <text:p/>
        </draw:connector>
        <draw:connector draw:style-name="gr6" draw:text-style-name="P3" draw:layer="layout" draw:type="curve" svg:x1="48.334cm" svg:y1="53.801cm" svg:x2="48.333cm" svg:y2="53.04cm" draw:start-shape="id40" draw:start-glue-point="0" draw:end-shape="id73" draw:end-glue-point="2" svg:d="M48334 53801c0-570-1-190-1-761" svg:viewBox="0 0 2 762">
          <text:p/>
        </draw:connector>
        <draw:connector draw:style-name="gr6" draw:text-style-name="P3" draw:layer="layout" draw:type="curve" svg:x1="48.334cm" svg:y1="56.341cm" svg:x2="21.024cm" svg:y2="62.1cm" draw:start-shape="id40" draw:start-glue-point="2" draw:end-shape="id75" draw:end-glue-point="0" svg:d="M48334 56341c0 4320-27310 1441-27310 5759" svg:viewBox="0 0 27311 5760">
          <text:p/>
        </draw:connector>
        <draw:connector draw:style-name="gr6" draw:text-style-name="P3" draw:layer="layout" draw:type="curve" svg:x1="48.332cm" svg:y1="39.999cm" svg:x2="48.335cm" svg:y2="39.139cm" draw:start-shape="id69" draw:start-glue-point="0" draw:end-shape="id76" draw:end-glue-point="2" svg:d="M48332 39999c0-643 3-214 3-860" svg:viewBox="0 0 4 861">
          <text:p/>
        </draw:connector>
        <draw:connector draw:style-name="gr23" draw:text-style-name="P3" draw:layer="layout" draw:type="curve" svg:x1="48.331cm" svg:y1="30.638cm" svg:x2="40.032cm" svg:y2="32.499cm" draw:start-shape="id65" draw:start-glue-point="2" draw:end-shape="id77" draw:end-glue-point="0" svg:d="M48331 30638c0 1396-8299 466-8299 1861" svg:viewBox="0 0 8300 1862">
          <text:p/>
        </draw:connector>
        <draw:connector draw:style-name="gr6" draw:text-style-name="P3" draw:layer="layout" draw:type="curve" svg:x1="48.334cm" svg:y1="56.341cm" svg:x2="24.523cm" svg:y2="62.099cm" draw:start-shape="id40" draw:start-glue-point="2" draw:end-shape="id78" draw:end-glue-point="0" svg:d="M48334 56341c0 4318-23811 1440-23811 5758" svg:viewBox="0 0 23812 5759">
          <text:p/>
        </draw:connector>
        <draw:connector draw:style-name="gr6" draw:text-style-name="P3" draw:layer="layout" draw:type="curve" svg:x1="48.334cm" svg:y1="56.341cm" svg:x2="31.322cm" svg:y2="62.098cm" draw:start-shape="id40" draw:start-glue-point="2" draw:end-shape="id79" draw:end-glue-point="0" svg:d="M48334 56341c0 4318-17012 1440-17012 5757" svg:viewBox="0 0 17013 5758">
          <text:p/>
        </draw:connector>
        <draw:connector draw:style-name="gr6" draw:text-style-name="P3" draw:layer="layout" draw:type="curve" svg:x1="34.723cm" svg:y1="62.099cm" svg:x2="48.334cm" svg:y2="56.341cm" draw:start-shape="id80" draw:start-glue-point="0" draw:end-shape="id40" draw:end-glue-point="2" svg:d="M34723 62099c0-4317 13611-1438 13611-5758" svg:viewBox="0 0 13612 5759">
          <text:p/>
        </draw:connector>
        <draw:connector draw:style-name="gr2" draw:text-style-name="P3" draw:layer="layout" draw:type="curve" svg:x1="41.525cm" svg:y1="62.101cm" svg:x2="48.334cm" svg:y2="56.341cm" draw:start-shape="id81" draw:start-glue-point="0" draw:end-shape="id40" draw:end-glue-point="2" svg:d="M41525 62101c0-4318 6809-1439 6809-5760" svg:viewBox="0 0 6810 5761">
          <text:p/>
        </draw:connector>
        <draw:connector draw:style-name="gr6" draw:text-style-name="P3" draw:layer="layout" draw:type="curve" svg:x1="38.124cm" svg:y1="62.1cm" svg:x2="48.334cm" svg:y2="56.341cm" draw:start-shape="id82" draw:start-glue-point="0" draw:end-shape="id40" draw:end-glue-point="2" svg:d="M38124 62100c0-4318 10210-1439 10210-5759" svg:viewBox="0 0 10211 5760">
          <text:p/>
        </draw:connector>
        <draw:connector draw:style-name="gr6" draw:text-style-name="P3" draw:layer="layout" draw:type="curve" svg:x1="48.331cm" svg:y1="35.038cm" svg:x2="48.335cm" svg:y2="36.599cm" draw:start-shape="id70" draw:start-glue-point="2" draw:end-shape="id76" draw:end-glue-point="0" svg:d="M48331 35038c0 1171 4 391 4 1561" svg:viewBox="0 0 5 1562">
          <text:p/>
        </draw:connector>
        <draw:connector draw:style-name="gr6" draw:text-style-name="P3" draw:layer="layout" draw:type="curve" svg:x1="17.525cm" svg:y1="62.101cm" svg:x2="48.334cm" svg:y2="56.341cm" draw:start-shape="id83" draw:start-glue-point="0" draw:end-shape="id40" draw:end-glue-point="2" svg:d="M17525 62101c0-4318 30809-1439 30809-5760" svg:viewBox="0 0 30810 5761">
          <text:p/>
        </draw:connector>
        <draw:connector draw:style-name="gr6" draw:text-style-name="P3" draw:layer="layout" draw:type="curve" svg:x1="27.924cm" svg:y1="62.1cm" svg:x2="48.334cm" svg:y2="56.341cm" draw:start-shape="id84" draw:start-glue-point="0" draw:end-shape="id40" draw:end-glue-point="2" svg:d="M27924 62100c0-4318 20410-1439 20410-5759" svg:viewBox="0 0 20411 5760">
          <text:p/>
        </draw:connector>
        <draw:connector draw:style-name="gr6" draw:text-style-name="P3" draw:layer="layout" draw:type="curve" svg:x1="44.154cm" svg:y1="36.596cm" svg:x2="44.153cm" svg:y2="35.035cm" draw:start-shape="id85" draw:start-glue-point="0" draw:end-shape="id86" draw:end-glue-point="2" svg:d="M44154 36596c0-1170-1-390-1-1561" svg:viewBox="0 0 2 1562">
          <text:p/>
        </draw:connector>
        <draw:connector draw:style-name="gr6" draw:text-style-name="P3" draw:layer="layout" draw:type="curve" svg:x1="44.153cm" svg:y1="32.495cm" svg:x2="44.155cm" svg:y2="30.637cm" draw:start-shape="id86" draw:start-glue-point="0" draw:end-shape="id67" draw:end-glue-point="2" svg:d="M44153 32495c0-1392 2-463 2-1858" svg:viewBox="0 0 3 1859">
          <text:p/>
        </draw:connector>
        <draw:connector draw:style-name="gr9" draw:text-style-name="P3" draw:layer="layout" draw:type="curve" svg:x1="46.807cm" svg:y1="29.368cm" svg:x2="45.679cm" svg:y2="29.367cm" draw:start-shape="id65" draw:start-glue-point="3" draw:end-shape="id67" draw:end-glue-point="1" svg:d="M46807 29368c-844 0-281-1-1128-1" svg:viewBox="0 0 1129 2">
          <text:p/>
        </draw:connector>
        <draw:connector draw:style-name="gr24" draw:text-style-name="P3" draw:layer="layout" draw:type="curve" svg:x1="40.652cm" svg:y1="28.094cm" svg:x2="44.153cm" svg:y2="26.635cm" draw:start-shape="id87" draw:start-glue-point="0" draw:end-shape="id10" draw:end-glue-point="2" svg:d="M40652 28094c0-1093 3501-364 3501-1459" svg:viewBox="0 0 3502 1460">
          <text:p/>
        </draw:connector>
        <draw:custom-shape draw:style-name="gr25" draw:text-style-name="P6" xml:id="id37" draw:id="id37" draw:layer="layout" svg:width="3.048cm" svg:height="3.099cm" svg:x="46.79cm" svg:y="23.997cm">
          <text:p text:style-name="P4"><text:span text:style-name="T5">Pharez</text:span></text:p>
          <text:p text:style-name="P4"><text:span text:style-name="T4">1Ch 2:4</text:span></text:p>
          <text:p text:style-name="P4"><text:span text:style-name="T4">Rth 4:18</text:span></text:p>
          <text:p text:style-name="P4"><text:span text:style-name="T14">Perez</text:span></text:p>
          <text:p text:style-name="P4"><text:span text:style-name="T4">1Ch 27:3</text:span></text:p>
          <text:p text:style-name="P4"><text:span text:style-name="T4">Neh 11:4,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66" draw:id="id66" draw:layer="layout" svg:width="3.048cm" svg:height="2.54cm" svg:x="54.99cm" svg:y="28.104cm">
          <text:p text:style-name="P4"><text:span text:style-name="T5">Hamul</text:span></text:p>
          <text:p text:style-name="P4"><text:span text:style-name="T4">Gen 46:12</text:span></text:p>
          <text:p text:style-name="P4"><text:span text:style-name="T4">Num 26:21</text:span></text:p>
          <text:p text:style-name="P4"><text:span text:style-name="T4">1Ch 2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65" draw:id="id65" draw:layer="layout" svg:width="3.048cm" svg:height="2.54cm" svg:x="46.807cm" svg:y="28.098cm">
          <text:p text:style-name="P4"><text:span text:style-name="T5">Hezron</text:span></text:p>
          <text:p text:style-name="P4"><text:span text:style-name="T4">1Ch 2:5</text:span></text:p>
          <text:p text:style-name="P4"><text:span text:style-name="T14">Esrom</text:span></text:p>
          <text:p text:style-name="P4"><text:span text:style-name="T4">Mat 1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70" draw:id="id70" draw:layer="layout" svg:width="3.048cm" svg:height="2.54cm" svg:x="46.807cm" svg:y="32.498cm">
          <text:p text:style-name="P4"><text:span text:style-name="T5">Ram</text:span></text:p>
          <text:p text:style-name="P4"><text:span text:style-name="T4">1Ch 2:9</text:span></text:p>
          <text:p text:style-name="P4"><text:span text:style-name="T14">Aram</text:span></text:p>
          <text:p text:style-name="P4"><text:span text:style-name="T4">Mat 1:3,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76" draw:id="id76" draw:layer="layout" svg:width="3.302cm" svg:height="2.54cm" svg:x="46.684cm" svg:y="36.599cm">
          <text:p text:style-name="P4"><text:span text:style-name="T5">Amminadab</text:span></text:p>
          <text:p text:style-name="P4"><text:span text:style-name="T4">1Ch 2:10</text:span></text:p>
          <text:p text:style-name="P4"><text:span text:style-name="T14">Aminadab</text:span></text:p>
          <text:p text:style-name="P4"><text:span text:style-name="T4">Mat 1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69" draw:id="id69" draw:layer="layout" svg:width="3.048cm" svg:height="2.54cm" svg:x="46.808cm" svg:y="39.999cm">
          <text:p text:style-name="P4"><text:span text:style-name="T5">Nahshon</text:span></text:p>
          <text:p text:style-name="P4"><text:span text:style-name="T4">1Ch 2:10</text:span></text:p>
          <text:p text:style-name="P4"><text:span text:style-name="T14">Naasson</text:span></text:p>
          <text:p text:style-name="P4"><text:span text:style-name="T4">Mat 1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68" draw:id="id68" draw:layer="layout" svg:width="3.048cm" svg:height="2.54cm" svg:x="46.809cm" svg:y="43.3cm">
          <text:p text:style-name="P4"><text:span text:style-name="T5">Salma</text:span></text:p>
          <text:p text:style-name="P4"><text:span text:style-name="T4">1Ch 2:11</text:span></text:p>
          <text:p text:style-name="P4"><text:span text:style-name="T14">Salmon</text:span></text:p>
          <text:p text:style-name="P4"><text:span text:style-name="T4">Rth 4:20,21</text:span></text:p>
          <text:p text:style-name="P4"><text:span text:style-name="T4">Mat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71" draw:id="id71" draw:layer="layout" svg:width="3.048cm" svg:height="2.54cm" svg:x="46.809cm" svg:y="46.9cm">
          <text:p text:style-name="P4"><text:span text:style-name="T5">Boaz</text:span></text:p>
          <text:p text:style-name="P4"><text:span text:style-name="T4">1Ch 2:11</text:span></text:p>
          <text:p text:style-name="P4"><text:span text:style-name="T14">Booz</text:span></text:p>
          <text:p text:style-name="P4"><text:span text:style-name="T4">Luk 3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73" draw:id="id73" draw:layer="layout" svg:width="3.048cm" svg:height="2.54cm" svg:x="46.809cm" svg:y="50.5cm">
          <text:p text:style-name="P4"><text:span text:style-name="T5">Obed</text:span></text:p>
          <text:p text:style-name="P4"><text:span text:style-name="T4">1Ch 2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40" draw:id="id40" draw:layer="layout" svg:width="3.048cm" svg:height="2.54cm" svg:x="46.81cm" svg:y="53.801cm">
          <text:p text:style-name="P4"><text:span text:style-name="T5">Jesse</text:span></text:p>
          <text:p text:style-name="P4"><text:span text:style-name="T4">1Ch 2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79" draw:id="id79" draw:layer="layout" svg:width="3.048cm" svg:height="2.54cm" svg:x="29.798cm" svg:y="62.098cm">
          <text:p text:style-name="P4"><text:span text:style-name="T5">Raddai</text:span></text:p>
          <text:p text:style-name="P4"><text:span text:style-name="T4">1Ch 2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80" draw:id="id80" draw:layer="layout" svg:width="3.048cm" svg:height="2.54cm" svg:x="33.199cm" svg:y="62.099cm">
          <text:p text:style-name="P4"><text:span text:style-name="T5">Ozem</text:span></text:p>
          <text:p text:style-name="P4"><text:span text:style-name="T4">1Ch 2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6" xml:id="id78" draw:id="id78" draw:layer="layout" svg:width="3.048cm" svg:height="4.131cm" svg:x="22.999cm" svg:y="62.099cm">
          <text:p text:style-name="P4"><text:span text:style-name="T5">Shimma</text:span></text:p>
          <text:p text:style-name="P4"><text:span text:style-name="T4">1Ch 2:13</text:span></text:p>
          <text:p text:style-name="P4"><text:span text:style-name="T14">Shammah</text:span></text:p>
          <text:p text:style-name="P4"><text:span text:style-name="T4">1Sa 16:9, 17:13</text:span></text:p>
          <text:p text:style-name="P4"><text:span text:style-name="T14">Shimea</text:span></text:p>
          <text:p text:style-name="P4"><text:span text:style-name="T4">1Ch 20:7</text:span></text:p>
          <text:p text:style-name="P9"><text:span text:style-name="T14">Shimeah</text:span></text:p>
          <text:p text:style-name="P9"><text:span text:style-name="T4">2Sa 13:3,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84" draw:id="id84" draw:layer="layout" svg:width="3.048cm" svg:height="2.54cm" svg:x="26.4cm" svg:y="62.1cm">
          <text:p text:style-name="P4"><text:span text:style-name="T5">Nethaneel</text:span></text:p>
          <text:p text:style-name="P4"><text:span text:style-name="T4">1Ch 2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39" draw:id="id39" draw:layer="layout" svg:width="3.048cm" svg:height="2.54cm" svg:x="43.399cm" svg:y="62.099cm">
          <text:p text:style-name="P4"><text:span text:style-name="T5">Zeruiah</text:span></text:p>
          <text:p text:style-name="P4"><text:span text:style-name="T4">1Ch 2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41" draw:id="id41" draw:layer="layout" svg:width="3.048cm" svg:height="2.54cm" svg:x="46.8cm" svg:y="62.1cm">
          <text:p text:style-name="P4"><text:span text:style-name="T5">Abigail</text:span></text:p>
          <text:p text:style-name="P4"><text:span text:style-name="T4">1Ch 2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82" draw:id="id82" draw:layer="layout" svg:width="3.048cm" svg:height="2.54cm" svg:x="36.6cm" svg:y="62.1cm">
          <text:p text:style-name="P4"><text:span text:style-name="T5">David</text:span></text:p>
          <text:p text:style-name="P4"><text:span text:style-name="T4">1Ch 2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81" draw:id="id81" draw:layer="layout" svg:width="3.048cm" svg:height="2.54cm" svg:x="40.001cm" svg:y="62.101cm">
          <text:p text:style-name="P4"><text:span text:style-name="T9">Elihu</text:span></text:p>
          <text:p text:style-name="P4"><text:span text:style-name="T4">1Sa 16:10,11, 17:12</text:span></text:p>
          <text:p text:style-name="P4"><text:span text:style-name="T4">1Ch 27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75" draw:id="id75" draw:layer="layout" svg:width="3.048cm" svg:height="2.54cm" svg:x="19.5cm" svg:y="62.1cm">
          <text:p text:style-name="P4"><text:span text:style-name="T5">Abinadab</text:span></text:p>
          <text:p text:style-name="P4"><text:span text:style-name="T4">1Ch 2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83" draw:id="id83" draw:layer="layout" svg:width="3.048cm" svg:height="2.54cm" svg:x="16.001cm" svg:y="62.101cm">
          <text:p text:style-name="P4"><text:span text:style-name="T7">Eliab</text:span></text:p>
          <text:p text:style-name="P4"><text:span text:style-name="T4">1Ch 2:13</text:span></text:p>
          <text:p text:style-name="P4"><text:span text:style-name="T4">1Sa 17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44.923cm" svg:y1="64.639cm" svg:x2="51.726cm" svg:y2="66.102cm" draw:start-shape="id39" draw:start-glue-point="2" draw:end-shape="id88" draw:end-glue-point="0" svg:d="M44923 64639c0 1098 6803 367 6803 1463" svg:viewBox="0 0 6804 1464">
          <text:p/>
        </draw:connector>
        <draw:connector draw:style-name="gr6" draw:text-style-name="P3" draw:layer="layout" draw:type="curve" svg:x1="44.923cm" svg:y1="64.639cm" svg:x2="44.924cm" svg:y2="66.1cm" draw:start-shape="id39" draw:start-glue-point="2" draw:end-shape="id89" draw:end-glue-point="0" svg:d="M44923 64639c0 1096 1 366 1 1461" svg:viewBox="0 0 2 1462">
          <text:p/>
        </draw:connector>
        <draw:connector draw:style-name="gr9" draw:text-style-name="P3" draw:layer="layout" draw:type="curve" svg:x1="50.702cm" svg:y1="63.36cm" svg:x2="49.848cm" svg:y2="63.37cm" draw:start-shape="id90" draw:start-glue-point="3" draw:end-shape="id41" draw:end-glue-point="1" svg:d="M50702 63360c-639 0-212 10-854 10" svg:viewBox="0 0 855 11">
          <text:p/>
        </draw:connector>
        <draw:connector draw:style-name="gr6" draw:text-style-name="P3" draw:layer="layout" draw:type="curve" svg:x1="48.324cm" svg:y1="64.64cm" svg:x2="55.127cm" svg:y2="66.103cm" draw:start-shape="id41" draw:start-glue-point="2" draw:end-shape="id91" draw:end-glue-point="0" svg:d="M48324 64640c0 1098 6803 367 6803 1463" svg:viewBox="0 0 6804 1464">
          <text:p/>
        </draw:connector>
        <draw:connector draw:style-name="gr6" draw:text-style-name="P3" draw:layer="layout" draw:type="curve" svg:x1="44.923cm" svg:y1="64.639cm" svg:x2="48.325cm" svg:y2="66.101cm" draw:start-shape="id39" draw:start-glue-point="2" draw:end-shape="id92" draw:end-glue-point="0" svg:d="M44923 64639c0 1098 3402 367 3402 1462" svg:viewBox="0 0 3403 1463">
          <text:p/>
        </draw:connector>
        <draw:custom-shape draw:style-name="gr7" draw:text-style-name="P6" xml:id="id89" draw:id="id89" draw:layer="layout" svg:width="3.048cm" svg:height="2.54cm" svg:x="43.4cm" svg:y="66.1cm">
          <text:p text:style-name="P4"><text:span text:style-name="T5">Abishai</text:span></text:p>
          <text:p text:style-name="P4"><text:span text:style-name="T4">1Ch 2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92" draw:id="id92" draw:layer="layout" svg:width="3.048cm" svg:height="2.54cm" svg:x="46.801cm" svg:y="66.101cm">
          <text:p text:style-name="P4"><text:span text:style-name="T5">Joab</text:span></text:p>
          <text:p text:style-name="P4"><text:span text:style-name="T4">1Ch 2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88" draw:id="id88" draw:layer="layout" svg:width="3.048cm" svg:height="2.54cm" svg:x="50.202cm" svg:y="66.102cm">
          <text:p text:style-name="P4"><text:span text:style-name="T9">Asahel</text:span></text:p>
          <text:p text:style-name="P4"><text:span text:style-name="T4">1Ch 2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90" draw:id="id90" draw:layer="layout" svg:width="3.048cm" svg:height="2.54cm" svg:x="50.702cm" svg:y="62.09cm">
          <text:p text:style-name="P4"><text:span text:style-name="T9">Jether</text:span><text:span text:style-name="T10"> </text:span><text:span text:style-name="T4">Ishmeelite</text:span></text:p>
          <text:p text:style-name="P4"><text:span text:style-name="T4">1Ch 2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91" draw:id="id91" draw:layer="layout" svg:width="3.048cm" svg:height="2.54cm" svg:x="53.603cm" svg:y="66.103cm">
          <text:p text:style-name="P4"><text:span text:style-name="T9">Amasa</text:span></text:p>
          <text:p text:style-name="P4"><text:span text:style-name="T4">1Ch 2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67" draw:id="id67" draw:layer="layout" svg:width="3.048cm" svg:height="2.54cm" svg:x="42.631cm" svg:y="28.097cm">
          <text:p text:style-name="P4"><text:span text:style-name="T5">Daughter of Machir</text:span></text:p>
          <text:p text:style-name="P4"><text:span text:style-name="T4">1Ch 2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" draw:text-style-name="P6" xml:id="id10" draw:id="id10" draw:layer="layout" svg:width="3.404cm" svg:height="2.642cm" svg:x="42.451cm" svg:y="23.993cm">
          <text:p text:style-name="P4"><text:span text:style-name="T7">Machir</text:span></text:p>
          <text:p text:style-name="P4"><text:span text:style-name="T4">1Ch 2:21, 7:14</text:span></text:p>
          <text:p text:style-name="P4"><text:span text:style-name="T4">Num 26:29, 27:1</text:span></text:p>
          <text:p text:style-name="P4"><text:span text:style-name="T4">Jos 17:1</text:span></text:p>
          <text:p text:style-name="P4"><text:span text:style-name="T4">Gen 50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87" draw:id="id87" draw:layer="layout" svg:width="3.048cm" svg:height="2.54cm" svg:x="39.128cm" svg:y="28.094cm">
          <text:p text:style-name="P4"><text:span text:style-name="T5">Gilead</text:span></text:p>
          <text:p text:style-name="P4"><text:span text:style-name="T4">Num 26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86" draw:id="id86" draw:layer="layout" svg:width="3.048cm" svg:height="2.54cm" svg:x="42.629cm" svg:y="32.495cm">
          <text:p text:style-name="P4"><text:span text:style-name="T5">Segub</text:span></text:p>
          <text:p text:style-name="P4"><text:span text:style-name="T4">1Ch 2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85" draw:id="id85" draw:layer="layout" svg:width="3.048cm" svg:height="2.54cm" svg:x="42.63cm" svg:y="36.596cm">
          <text:p text:style-name="P4"><text:span text:style-name="T5">Jair</text:span></text:p>
          <text:p text:style-name="P4"><text:span text:style-name="T4">1Ch 2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13" xml:id="id93" draw:id="id93" draw:layer="layout" svg:width="3.048cm" svg:height="2.54cm" svg:x="50.912cm" svg:y="28.103cm">
          <text:p text:style-name="P9"><text:span text:style-name="T16">Abiah</text:span></text:p>
          <text:p text:style-name="P9"><text:span text:style-name="T4">1Ch 2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49.855cm" svg:y1="29.368cm" svg:x2="50.912cm" svg:y2="29.373cm" draw:start-shape="id65" draw:start-glue-point="1" draw:end-shape="id93" draw:end-glue-point="3" svg:d="M49855 29368c793 0 265 5 1057 5" svg:viewBox="0 0 1058 6">
          <text:p/>
        </draw:connector>
        <draw:custom-shape draw:style-name="gr7" draw:text-style-name="P6" xml:id="id94" draw:id="id94" draw:layer="layout" svg:width="3.048cm" svg:height="2.54cm" svg:x="50.91cm" svg:y="32.501cm">
          <text:p text:style-name="P4"><text:span text:style-name="T5">Ashur</text:span></text:p>
          <text:p text:style-name="P4"><text:span text:style-name="T4">1Ch 2:24</text:span></text:p>
          <text:p text:style-name="P4"><text:span text:style-name="T4">1Ch 4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52.434cm" svg:y1="32.501cm" svg:x2="52.436cm" svg:y2="30.643cm" draw:start-shape="id94" draw:start-glue-point="0" draw:end-shape="id93" draw:end-glue-point="2" svg:d="M52434 32501c0-1392 2-463 2-1858" svg:viewBox="0 0 3 1859">
          <text:p/>
        </draw:connector>
        <draw:connector draw:style-name="gr6" draw:text-style-name="P3" draw:layer="layout" draw:type="curve" svg:x1="40.032cm" svg:y1="35.039cm" svg:x2="25.836cm" svg:y2="36.6cm" draw:start-shape="id77" draw:start-glue-point="2" draw:end-shape="id95" draw:end-glue-point="0" svg:d="M40032 35039c0 1171-14196 391-14196 1561" svg:viewBox="0 0 14197 1562">
          <text:p/>
        </draw:connector>
        <draw:connector draw:style-name="gr2" draw:text-style-name="P3" draw:layer="layout" draw:type="curve" svg:x1="40.032cm" svg:y1="35.039cm" svg:x2="29.535cm" svg:y2="36.602cm" draw:start-shape="id77" draw:start-glue-point="2" draw:end-shape="id96" draw:end-glue-point="0" svg:d="M40032 35039c0 1173-10497 392-10497 1563" svg:viewBox="0 0 10498 1564">
          <text:p/>
        </draw:connector>
        <draw:custom-shape draw:style-name="gr29" draw:text-style-name="P11" xml:id="id97" draw:id="id97" draw:layer="layout" svg:width="3.251cm" svg:height="2.591cm" svg:x="50.816cm" svg:y="36.543cm">
          <text:p text:style-name="P4"><text:span text:style-name="T5">Tekoa</text:span></text:p>
          <text:p text:style-name="P4"><text:span text:style-name="T4">1Ch 2:24, 4:5</text:span></text:p>
          <text:p text:style-name="P4"><text:span text:style-name="T4">2Ch 11:6, 20:20</text:span></text:p>
          <text:p text:style-name="P4"><text:span text:style-name="T4">Jer 6:1, Amo 1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1" draw:text-style-name="P3" draw:layer="layout" draw:type="curve" svg:x1="52.441cm" svg:y1="36.543cm" svg:x2="52.434cm" svg:y2="35.041cm" draw:start-shape="id97" draw:start-glue-point="0" draw:end-shape="id94" draw:end-glue-point="2" svg:d="M52441 36543c0-1126-7-376-7-1502" svg:viewBox="0 0 8 1503">
          <text:p/>
        </draw:connector>
        <draw:custom-shape draw:style-name="gr30" draw:text-style-name="P11" xml:id="id98" draw:id="id98" draw:layer="layout" svg:width="3.15cm" svg:height="2.591cm" svg:x="35.525cm" svg:y="28.067cm">
          <text:p text:style-name="P4"><text:span text:style-name="T5">Gilead</text:span></text:p>
          <text:p text:style-name="P4"><text:span text:style-name="T4">Num 32:39,40</text:span></text:p>
          <text:p text:style-name="P4"><text:span text:style-name="T4">Deu 3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1" draw:text-style-name="P3" draw:layer="layout" draw:type="curve" svg:x1="37.1cm" svg:y1="28.067cm" svg:x2="44.153cm" svg:y2="26.635cm" draw:start-shape="id98" draw:start-glue-point="0" draw:end-shape="id10" draw:end-glue-point="2" svg:d="M37100 28067c0-1074 7053-358 7053-1432" svg:viewBox="0 0 7054 1433">
          <text:p/>
        </draw:connector>
        <draw:custom-shape draw:style-name="gr7" draw:text-style-name="P6" xml:id="id77" draw:id="id77" draw:layer="layout" svg:width="3.048cm" svg:height="2.54cm" svg:x="38.508cm" svg:y="32.499cm">
          <text:p text:style-name="P4"><text:span text:style-name="T7">Jerahmeel</text:span></text:p>
          <text:p text:style-name="P4"><text:span text:style-name="T4">1Ch 2:9</text:span></text:p>
          <text:p text:style-name="P4"><text:span text:style-name="T4">1Ch 2:25</text:span></text:p>
          <text:p text:style-name="P4"><text:span text:style-name="T4">1Sa 30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95" draw:id="id95" draw:layer="layout" svg:width="3.302cm" svg:height="2.54cm" svg:x="24.185cm" svg:y="36.6cm">
          <text:p text:style-name="P4"><text:span text:style-name="T7">Ram</text:span></text:p>
          <text:p text:style-name="P4"><text:span text:style-name="T4">1Ch 2:25</text:span></text:p>
          <text:p text:style-name="P4"><text:span text:style-name="T4">1Ch 2: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96" draw:id="id96" draw:layer="layout" svg:width="3.048cm" svg:height="2.54cm" svg:x="28.011cm" svg:y="36.602cm">
          <text:p text:style-name="P4"><text:span text:style-name="T5">Bunah</text:span></text:p>
          <text:p text:style-name="P4"><text:span text:style-name="T4">1Ch 2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16" draw:id="id116" draw:layer="layout" svg:width="3.048cm" svg:height="2.54cm" svg:x="31.512cm" svg:y="36.603cm">
          <text:p text:style-name="P4"><text:span text:style-name="T5">Oren</text:span></text:p>
          <text:p text:style-name="P4"><text:span text:style-name="T4">1Ch 2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17" draw:id="id117" draw:layer="layout" svg:width="3.048cm" svg:height="2.54cm" svg:x="35.012cm" svg:y="36.603cm">
          <text:p text:style-name="P4"><text:span text:style-name="T5">Ozem</text:span></text:p>
          <text:p text:style-name="P4"><text:span text:style-name="T4">1Ch 2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18" draw:id="id118" draw:layer="layout" svg:width="3.048cm" svg:height="2.54cm" svg:x="38.513cm" svg:y="36.604cm">
          <text:p text:style-name="P4"><text:span text:style-name="T5">Ahijah</text:span></text:p>
          <text:p text:style-name="P4"><text:span text:style-name="T4">1Ch 2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25.836cm" svg:y1="39.14cm" svg:x2="25.838cm" svg:y2="40.602cm" draw:start-shape="id95" draw:start-glue-point="2" draw:end-shape="id99" draw:end-glue-point="0" svg:d="M25836 39140c0 1098 2 367 2 1462" svg:viewBox="0 0 3 1463">
          <text:p/>
        </draw:connector>
        <draw:connector draw:style-name="gr2" draw:text-style-name="P3" draw:layer="layout" draw:type="curve" svg:x1="25.836cm" svg:y1="39.14cm" svg:x2="33.336cm" svg:y2="40.603cm" draw:start-shape="id95" draw:start-glue-point="2" draw:end-shape="id100" draw:end-glue-point="0" svg:d="M25836 39140c0 1098 7500 367 7500 1463" svg:viewBox="0 0 7501 1464">
          <text:p/>
        </draw:connector>
        <draw:connector draw:style-name="gr2" draw:text-style-name="P3" draw:layer="layout" draw:type="curve" svg:x1="22.037cm" svg:y1="39.141cm" svg:x2="22.038cm" svg:y2="40.602cm" draw:start-shape="id101" draw:start-glue-point="2" draw:end-shape="id102" draw:end-glue-point="0" svg:d="M22037 39141c0 1096 1 366 1 1461" svg:viewBox="0 0 2 1462">
          <text:p/>
        </draw:connector>
        <draw:connector draw:style-name="gr6" draw:text-style-name="P3" draw:layer="layout" draw:type="curve" draw:line-skew="-0.256cm" svg:x1="36.035cm" svg:y1="35.042cm" svg:x2="22.037cm" svg:y2="36.601cm" draw:start-shape="id103" draw:start-glue-point="2" draw:end-shape="id101" draw:end-glue-point="0" svg:d="M36035 35042c0 786-13998 7-13998 1559" svg:viewBox="0 0 13999 1560">
          <text:p/>
        </draw:connector>
        <draw:connector draw:style-name="gr2" draw:text-style-name="P3" draw:layer="layout" draw:type="curve" svg:x1="25.836cm" svg:y1="39.14cm" svg:x2="29.637cm" svg:y2="40.601cm" draw:start-shape="id95" draw:start-glue-point="2" draw:end-shape="id104" draw:end-glue-point="0" svg:d="M25836 39140c0 1096 3801 366 3801 1461" svg:viewBox="0 0 3802 1462">
          <text:p/>
        </draw:connector>
        <draw:connector draw:style-name="gr2" draw:text-style-name="P3" draw:layer="layout" draw:type="curve" svg:x1="22.037cm" svg:y1="39.141cm" svg:x2="18.239cm" svg:y2="40.603cm" draw:start-shape="id101" draw:start-glue-point="2" draw:end-shape="id105" draw:end-glue-point="0" svg:d="M22037 39141c0 1098-3798 367-3798 1462" svg:viewBox="0 0 3799 1463">
          <text:p/>
        </draw:connector>
        <draw:connector draw:style-name="gr2" draw:text-style-name="P3" draw:layer="layout" draw:type="curve" svg:x1="10.038cm" svg:y1="48.405cm" svg:x2="10.04cm" svg:y2="47.044cm" draw:start-shape="id106" draw:start-glue-point="0" draw:end-shape="id107" draw:end-glue-point="2" svg:d="M10038 48405c0-1020 2-340 2-1361" svg:viewBox="0 0 3 1362">
          <text:p/>
        </draw:connector>
        <draw:connector draw:style-name="gr2" draw:text-style-name="P3" draw:layer="layout" draw:type="curve" svg:x1="10.04cm" svg:y1="44.504cm" svg:x2="18.239cm" svg:y2="43.143cm" draw:start-shape="id107" draw:start-glue-point="0" draw:end-shape="id105" draw:end-glue-point="2" svg:d="M10040 44504c0-1020 8199-340 8199-1361" svg:viewBox="0 0 8200 1362">
          <text:p/>
        </draw:connector>
        <draw:connector draw:style-name="gr2" draw:text-style-name="P3" draw:layer="layout" draw:type="curve" svg:x1="13.839cm" svg:y1="44.503cm" svg:x2="18.239cm" svg:y2="43.143cm" draw:start-shape="id108" draw:start-glue-point="0" draw:end-shape="id105" draw:end-glue-point="2" svg:d="M13839 44503c0-1018 4400-339 4400-1360" svg:viewBox="0 0 4401 1361">
          <text:p/>
        </draw:connector>
        <draw:connector draw:style-name="gr6" draw:text-style-name="P3" draw:layer="layout" draw:type="curve" svg:x1="13.838cm" svg:y1="48.402cm" svg:x2="17.536cm" svg:y2="47.043cm" draw:start-shape="id109" draw:start-glue-point="0" draw:end-shape="id110" draw:end-glue-point="2" svg:d="M13838 48402c0-1018 3698-339 3698-1359" svg:viewBox="0 0 3699 1360">
          <text:p/>
        </draw:connector>
        <draw:connector draw:style-name="gr2" draw:text-style-name="P3" draw:layer="layout" draw:type="curve" svg:x1="25.839cm" svg:y1="44.403cm" svg:x2="22.038cm" svg:y2="43.142cm" draw:start-shape="id111" draw:start-glue-point="0" draw:end-shape="id102" draw:end-glue-point="2" svg:d="M25839 44403c0-945-3801-315-3801-1261" svg:viewBox="0 0 3802 1262">
          <text:p/>
        </draw:connector>
        <draw:connector draw:style-name="gr6" draw:text-style-name="P3" draw:layer="layout" draw:type="curve" svg:x1="10.043cm" svg:y1="77.762cm" svg:x2="10.043cm" svg:y2="77.402cm" draw:start-shape="id112" draw:start-glue-point="0" draw:end-shape="id113" draw:end-glue-point="2" svg:d="M10043 77762v-360" svg:viewBox="0 0 1 361">
          <text:p/>
        </draw:connector>
        <draw:connector draw:style-name="gr6" draw:text-style-name="P3" draw:layer="layout" draw:type="curve" svg:x1="10.044cm" svg:y1="80.663cm" svg:x2="10.043cm" svg:y2="80.302cm" draw:start-shape="id114" draw:start-glue-point="0" draw:end-shape="id112" draw:end-glue-point="2" svg:d="M10044 80663c0-270-1-90-1-361" svg:viewBox="0 0 2 362">
          <text:p/>
        </draw:connector>
        <draw:connector draw:style-name="gr2" draw:text-style-name="P3" draw:layer="layout" draw:type="curve" svg:x1="29.638cm" svg:y1="48.502cm" svg:x2="25.839cm" svg:y2="46.943cm" draw:start-shape="id115" draw:start-glue-point="0" draw:end-shape="id111" draw:end-glue-point="2" svg:d="M29638 48502c0-1168-3799-389-3799-1559" svg:viewBox="0 0 3800 1560">
          <text:p/>
        </draw:connector>
        <draw:connector draw:style-name="gr2" draw:text-style-name="P3" draw:layer="layout" draw:type="curve" svg:x1="40.032cm" svg:y1="35.039cm" svg:x2="33.036cm" svg:y2="36.603cm" draw:start-shape="id77" draw:start-glue-point="2" draw:end-shape="id116" draw:end-glue-point="0" svg:d="M40032 35039c0 1174-6996 393-6996 1564" svg:viewBox="0 0 6997 1565">
          <text:p/>
        </draw:connector>
        <draw:connector draw:style-name="gr2" draw:text-style-name="P3" draw:layer="layout" draw:type="curve" svg:x1="40.032cm" svg:y1="35.039cm" svg:x2="36.536cm" svg:y2="36.603cm" draw:start-shape="id77" draw:start-glue-point="2" draw:end-shape="id117" draw:end-glue-point="0" svg:d="M40032 35039c0 1174-3496 393-3496 1564" svg:viewBox="0 0 3497 1565">
          <text:p/>
        </draw:connector>
        <draw:connector draw:style-name="gr2" draw:text-style-name="P3" draw:layer="layout" draw:type="curve" svg:x1="40.032cm" svg:y1="35.039cm" svg:x2="40.037cm" svg:y2="36.604cm" draw:start-shape="id77" draw:start-glue-point="2" draw:end-shape="id118" draw:end-glue-point="0" svg:d="M40032 35039c0 1174 5 392 5 1565" svg:viewBox="0 0 6 1566">
          <text:p/>
        </draw:connector>
        <draw:custom-shape draw:style-name="gr8" draw:text-style-name="P7" xml:id="id103" draw:id="id103" draw:layer="layout" svg:width="3.048cm" svg:height="2.54cm" svg:x="34.511cm" svg:y="32.502cm">
          <text:p text:style-name="P4"><text:span text:style-name="T5">Atarah</text:span></text:p>
          <text:p text:style-name="P4"><text:span text:style-name="T4">1Ch 2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38.508cm" svg:y1="33.769cm" svg:x2="37.559cm" svg:y2="33.772cm" draw:start-shape="id77" draw:start-glue-point="3" draw:end-shape="id103" draw:end-glue-point="1" svg:d="M38508 33769c-711 0-237 3-949 3" svg:viewBox="0 0 950 4">
          <text:p/>
        </draw:connector>
        <draw:custom-shape draw:style-name="gr26" draw:text-style-name="P6" xml:id="id101" draw:id="id101" draw:layer="layout" svg:width="3.302cm" svg:height="2.54cm" svg:x="20.386cm" svg:y="36.601cm">
          <text:p text:style-name="P4"><text:span text:style-name="T5">Onam</text:span></text:p>
          <text:p text:style-name="P4"><text:span text:style-name="T4">1Ch 2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104" draw:id="id104" draw:layer="layout" svg:width="3.302cm" svg:height="2.54cm" svg:x="27.986cm" svg:y="40.601cm">
          <text:p text:style-name="P4"><text:span text:style-name="T3">Jamin</text:span></text:p>
          <text:p text:style-name="P4"><text:span text:style-name="T4">1Ch 2: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00" draw:id="id100" draw:layer="layout" svg:width="3.048cm" svg:height="2.54cm" svg:x="31.812cm" svg:y="40.603cm">
          <text:p text:style-name="P4"><text:span text:style-name="T5">Eker</text:span></text:p>
          <text:p text:style-name="P4"><text:span text:style-name="T4">1Ch 2: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99" draw:id="id99" draw:layer="layout" svg:width="3.302cm" svg:height="2.54cm" svg:x="24.187cm" svg:y="40.602cm">
          <text:p text:style-name="P4"><text:span text:style-name="T5">Maaz</text:span></text:p>
          <text:p text:style-name="P4"><text:span text:style-name="T4">1Ch 2: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102" draw:id="id102" draw:layer="layout" svg:width="3.302cm" svg:height="2.54cm" svg:x="20.387cm" svg:y="40.602cm">
          <text:p text:style-name="P4"><text:span text:style-name="T3">Jada</text:span></text:p>
          <text:p text:style-name="P4"><text:span text:style-name="T4">1Ch 2:28,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105" draw:id="id105" draw:layer="layout" svg:width="3.302cm" svg:height="2.54cm" svg:x="16.588cm" svg:y="40.603cm">
          <text:p text:style-name="P4"><text:span text:style-name="T5">Shammai</text:span></text:p>
          <text:p text:style-name="P4"><text:span text:style-name="T4">1Ch 2:28,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108" draw:id="id108" draw:layer="layout" svg:width="3.302cm" svg:height="2.54cm" svg:x="12.188cm" svg:y="44.503cm">
          <text:p text:style-name="P4"><text:span text:style-name="T3">Abishur</text:span></text:p>
          <text:p text:style-name="P4"><text:span text:style-name="T4">1Ch 2: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107" draw:id="id107" draw:layer="layout" svg:width="3.302cm" svg:height="2.54cm" svg:x="8.389cm" svg:y="44.504cm">
          <text:p text:style-name="P4"><text:span text:style-name="T5">Nadab</text:span></text:p>
          <text:p text:style-name="P4"><text:span text:style-name="T4">1Ch 2: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110" draw:id="id110" draw:layer="layout" svg:width="3.048cm" svg:height="2.54cm" svg:x="16.012cm" svg:y="44.503cm">
          <text:p text:style-name="P4"><text:span text:style-name="T5">Abihail</text:span></text:p>
          <text:p text:style-name="P4"><text:span text:style-name="T4">1Ch 2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16.012cm" svg:y1="45.773cm" svg:x2="15.49cm" svg:y2="45.773cm" draw:start-shape="id110" draw:start-glue-point="3" draw:end-shape="id108" draw:end-glue-point="1" svg:d="M16012 45773h-522" svg:viewBox="0 0 523 1">
          <text:p/>
        </draw:connector>
        <draw:custom-shape draw:style-name="gr26" draw:text-style-name="P6" xml:id="id109" draw:id="id109" draw:layer="layout" svg:width="3.302cm" svg:height="2.54cm" svg:x="12.187cm" svg:y="48.402cm">
          <text:p text:style-name="P4"><text:span text:style-name="T3">Ahban</text:span></text:p>
          <text:p text:style-name="P4"><text:span text:style-name="T4">1Ch 2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19" draw:id="id119" draw:layer="layout" svg:width="3.048cm" svg:height="2.54cm" svg:x="16.013cm" svg:y="48.404cm">
          <text:p text:style-name="P4"><text:span text:style-name="T5">Molid</text:span></text:p>
          <text:p text:style-name="P4"><text:span text:style-name="T4">1Ch 2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17.537cm" svg:y1="48.404cm" svg:x2="17.536cm" svg:y2="47.043cm" draw:start-shape="id119" draw:start-glue-point="0" draw:end-shape="id110" draw:end-glue-point="2" svg:d="M17537 48404c0-1020-1-340-1-1361" svg:viewBox="0 0 2 1362">
          <text:p/>
        </draw:connector>
        <draw:custom-shape draw:style-name="gr26" draw:text-style-name="P6" xml:id="id120" draw:id="id120" draw:layer="layout" svg:width="3.302cm" svg:height="2.54cm" svg:x="4.688cm" svg:y="48.403cm">
          <text:p text:style-name="P4"><text:span text:style-name="T3">Seled</text:span></text:p>
          <text:p text:style-name="P4"><text:span text:style-name="T4">1Ch 2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06" draw:id="id106" draw:layer="layout" svg:width="3.048cm" svg:height="2.54cm" svg:x="8.514cm" svg:y="48.405cm">
          <text:p text:style-name="P4"><text:span text:style-name="T5">Appaim</text:span></text:p>
          <text:p text:style-name="P4"><text:span text:style-name="T4">1Ch 2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6.339cm" svg:y1="48.403cm" svg:x2="10.04cm" svg:y2="47.044cm" draw:start-shape="id120" draw:start-glue-point="0" draw:end-shape="id107" draw:end-glue-point="2" svg:d="M6339 48403c0-1018 3701-339 3701-1359" svg:viewBox="0 0 3702 1360">
          <text:p/>
        </draw:connector>
        <draw:connector draw:style-name="gr2" draw:text-style-name="P3" draw:layer="layout" draw:type="curve" svg:x1="10.039cm" svg:y1="51.408cm" svg:x2="10.038cm" svg:y2="50.945cm" draw:start-shape="id121" draw:start-glue-point="0" draw:end-shape="id106" draw:end-glue-point="2" svg:d="M10039 51408c0-346-1-115-1-463" svg:viewBox="0 0 2 464">
          <text:p/>
        </draw:connector>
        <draw:custom-shape draw:style-name="gr7" draw:text-style-name="P6" xml:id="id121" draw:id="id121" draw:layer="layout" svg:width="3.048cm" svg:height="2.54cm" svg:x="8.515cm" svg:y="51.408cm">
          <text:p text:style-name="P4"><text:span text:style-name="T5">Ishi</text:span></text:p>
          <text:p text:style-name="P4"><text:span text:style-name="T4">1Ch 2: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0.04cm" svg:y1="54.411cm" svg:x2="10.039cm" svg:y2="53.948cm" draw:start-shape="id122" draw:start-glue-point="0" draw:end-shape="id121" draw:end-glue-point="2" svg:d="M10040 54411c0-346-1-115-1-463" svg:viewBox="0 0 2 464">
          <text:p/>
        </draw:connector>
        <draw:custom-shape draw:style-name="gr7" draw:text-style-name="P6" xml:id="id122" draw:id="id122" draw:layer="layout" svg:width="3.048cm" svg:height="2.54cm" svg:x="8.516cm" svg:y="54.411cm">
          <text:p text:style-name="P4"><text:span text:style-name="T5">Sheshan</text:span></text:p>
          <text:p text:style-name="P4"><text:span text:style-name="T4">1Ch 2: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0.041cm" svg:y1="57.422cm" svg:x2="10.04cm" svg:y2="56.951cm" draw:start-shape="id123" draw:start-glue-point="0" draw:end-shape="id122" draw:end-glue-point="2" svg:d="M10041 57422c0-352-1-117-1-471" svg:viewBox="0 0 2 472">
          <text:p/>
        </draw:connector>
        <draw:custom-shape draw:style-name="gr8" draw:text-style-name="P7" xml:id="id123" draw:id="id123" draw:layer="layout" svg:width="3.048cm" svg:height="2.54cm" svg:x="8.517cm" svg:y="57.422cm">
          <text:p text:style-name="P4"><text:span text:style-name="T5">Ahlai</text:span></text:p>
          <text:p text:style-name="P4"><text:span text:style-name="T4">1Ch 2:31</text:span></text:p>
          <text:p text:style-name="P4"><text:span text:style-name="T4">1Ch 2: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111" draw:id="id111" draw:layer="layout" svg:width="3.302cm" svg:height="2.54cm" svg:x="24.188cm" svg:y="44.403cm">
          <text:p text:style-name="P4"><text:span text:style-name="T5">Jonathan</text:span></text:p>
          <text:p text:style-name="P4"><text:span text:style-name="T4">1Ch 2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124" draw:id="id124" draw:layer="layout" svg:width="3.302cm" svg:height="2.54cm" svg:x="20.388cm" svg:y="44.403cm">
          <text:p text:style-name="P4"><text:span text:style-name="T3">Jether</text:span></text:p>
          <text:p text:style-name="P4"><text:span text:style-name="T4">1Ch 2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22.039cm" svg:y1="44.403cm" svg:x2="22.038cm" svg:y2="43.142cm" draw:start-shape="id124" draw:start-glue-point="0" draw:end-shape="id102" draw:end-glue-point="2" svg:d="M22039 44403c0-945-1-315-1-1261" svg:viewBox="0 0 2 1262">
          <text:p/>
        </draw:connector>
        <draw:custom-shape draw:style-name="gr26" draw:text-style-name="P6" xml:id="id115" draw:id="id115" draw:layer="layout" svg:width="3.302cm" svg:height="2.54cm" svg:x="27.987cm" svg:y="48.502cm">
          <text:p text:style-name="P4"><text:span text:style-name="T3">Zaza</text:span></text:p>
          <text:p text:style-name="P4"><text:span text:style-name="T4">1Ch 2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125" draw:id="id125" draw:layer="layout" svg:width="3.302cm" svg:height="2.54cm" svg:x="24.188cm" svg:y="48.503cm">
          <text:p text:style-name="P4"><text:span text:style-name="T5">Peleth</text:span></text:p>
          <text:p text:style-name="P4"><text:span text:style-name="T4">1Ch 2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25.839cm" svg:y1="48.503cm" svg:x2="25.839cm" svg:y2="46.943cm" draw:start-shape="id125" draw:start-glue-point="0" draw:end-shape="id111" draw:end-glue-point="2" svg:d="M25839 48503v-1560" svg:viewBox="0 0 1 1561">
          <text:p/>
        </draw:connector>
        <draw:custom-shape draw:style-name="gr7" draw:text-style-name="P6" xml:id="id126" draw:id="id126" draw:layer="layout" svg:width="3.048cm" svg:height="2.54cm" svg:x="12.217cm" svg:y="57.423cm">
          <text:p text:style-name="P4"><text:span text:style-name="T5">Jarha</text:span></text:p>
          <text:p text:style-name="P4"><text:span text:style-name="T4">Egyptian</text:span></text:p>
          <text:p text:style-name="P4"><text:span text:style-name="T4">1Ch 2:34,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12.217cm" svg:y1="58.693cm" svg:x2="11.565cm" svg:y2="58.692cm" draw:start-shape="id126" draw:start-glue-point="3" draw:end-shape="id123" draw:end-glue-point="1" svg:d="M12217 58693c-487 0-162-1-652-1" svg:viewBox="0 0 653 2">
          <text:p/>
        </draw:connector>
        <draw:custom-shape draw:style-name="gr7" draw:text-style-name="P6" xml:id="id127" draw:id="id127" draw:layer="layout" svg:width="3.048cm" svg:height="2.54cm" svg:x="8.517cm" svg:y="60.36cm">
          <text:p text:style-name="P4"><text:span text:style-name="T5">Attai</text:span></text:p>
          <text:p text:style-name="P4"><text:span text:style-name="T4">1Ch 2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10.041cm" svg:y1="60.36cm" svg:x2="10.041cm" svg:y2="59.962cm" draw:start-shape="id127" draw:start-glue-point="0" draw:end-shape="id123" draw:end-glue-point="2" svg:d="M10041 60360v-398" svg:viewBox="0 0 1 399">
          <text:p/>
        </draw:connector>
        <draw:custom-shape draw:style-name="gr7" draw:text-style-name="P6" xml:id="id132" draw:id="id132" draw:layer="layout" svg:width="3.048cm" svg:height="2.54cm" svg:x="8.518cm" svg:y="63.261cm">
          <text:p text:style-name="P4"><text:span text:style-name="T5">Nathan</text:span></text:p>
          <text:p text:style-name="P4"><text:span text:style-name="T4">1Ch 2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34" draw:id="id134" draw:layer="layout" svg:width="3.048cm" svg:height="2.54cm" svg:x="8.518cm" svg:y="66.161cm">
          <text:p text:style-name="P4"><text:span text:style-name="T5">Zabad</text:span></text:p>
          <text:p text:style-name="P4"><text:span text:style-name="T4">1Ch 2:36</text:span></text:p>
          <text:p text:style-name="P4"><text:span text:style-name="T4">1Ch 11:4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33" draw:id="id133" draw:layer="layout" svg:width="3.048cm" svg:height="2.54cm" svg:x="8.519cm" svg:y="69.062cm">
          <text:p text:style-name="P4"><text:span text:style-name="T5">Ephlal</text:span></text:p>
          <text:p text:style-name="P4"><text:span text:style-name="T4">1Ch 2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36" draw:id="id136" draw:layer="layout" svg:width="3.048cm" svg:height="2.54cm" svg:x="8.518cm" svg:y="71.961cm">
          <text:p text:style-name="P4"><text:span text:style-name="T5">Obed</text:span></text:p>
          <text:p text:style-name="P4"><text:span text:style-name="T4">1Ch 2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13" draw:id="id113" draw:layer="layout" svg:width="3.048cm" svg:height="2.54cm" svg:x="8.519cm" svg:y="74.862cm">
          <text:p text:style-name="P4"><text:span text:style-name="T5">Jehu</text:span></text:p>
          <text:p text:style-name="P4"><text:span text:style-name="T4">1Ch 2:3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12" draw:id="id112" draw:layer="layout" svg:width="3.048cm" svg:height="2.54cm" svg:x="8.519cm" svg:y="77.762cm">
          <text:p text:style-name="P4"><text:span text:style-name="T5">Azariah</text:span></text:p>
          <text:p text:style-name="P4"><text:span text:style-name="T4">1Ch 2:3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14" draw:id="id114" draw:layer="layout" svg:width="3.048cm" svg:height="2.54cm" svg:x="8.52cm" svg:y="80.663cm">
          <text:p text:style-name="P4"><text:span text:style-name="T5">Helez</text:span></text:p>
          <text:p text:style-name="P4"><text:span text:style-name="T4">1Ch 2:3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28" draw:id="id128" draw:layer="layout" svg:width="3.048cm" svg:height="2.54cm" svg:x="8.52cm" svg:y="83.563cm">
          <text:p text:style-name="P4"><text:span text:style-name="T5">Eleasah</text:span></text:p>
          <text:p text:style-name="P4"><text:span text:style-name="T4">1Ch 2:3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29" draw:id="id129" draw:layer="layout" svg:width="3.048cm" svg:height="2.54cm" svg:x="8.52cm" svg:y="86.563cm">
          <text:p text:style-name="P4"><text:span text:style-name="T5">Sisamai</text:span></text:p>
          <text:p text:style-name="P4"><text:span text:style-name="T4">1Ch 2:4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35" draw:id="id135" draw:layer="layout" svg:width="3.048cm" svg:height="2.54cm" svg:x="8.521cm" svg:y="89.564cm">
          <text:p text:style-name="P4"><text:span text:style-name="T5">Shallum</text:span></text:p>
          <text:p text:style-name="P4"><text:span text:style-name="T4">1Ch 2:4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10.044cm" svg:y1="83.563cm" svg:x2="10.044cm" svg:y2="83.203cm" draw:start-shape="id128" draw:start-glue-point="0" draw:end-shape="id114" draw:end-glue-point="2" svg:d="M10044 83563v-360" svg:viewBox="0 0 1 361">
          <text:p/>
        </draw:connector>
        <draw:connector draw:style-name="gr6" draw:text-style-name="P3" draw:layer="layout" draw:type="curve" svg:x1="10.044cm" svg:y1="86.563cm" svg:x2="10.044cm" svg:y2="86.103cm" draw:start-shape="id129" draw:start-glue-point="0" draw:end-shape="id128" draw:end-glue-point="2" svg:d="M10044 86563v-460" svg:viewBox="0 0 1 461">
          <text:p/>
        </draw:connector>
        <draw:connector draw:style-name="gr6" draw:text-style-name="P3" draw:layer="layout" draw:type="curve" svg:x1="10.047cm" svg:y1="95.566cm" svg:x2="10.046cm" svg:y2="95.105cm" draw:start-shape="id130" draw:start-glue-point="0" draw:end-shape="id131" draw:end-glue-point="2" svg:d="M10047 95566c0-345-1-115-1-461" svg:viewBox="0 0 2 462">
          <text:p/>
        </draw:connector>
        <draw:connector draw:style-name="gr6" draw:text-style-name="P3" draw:layer="layout" draw:type="curve" svg:x1="10.042cm" svg:y1="63.261cm" svg:x2="10.041cm" svg:y2="62.9cm" draw:start-shape="id132" draw:start-glue-point="0" draw:end-shape="id127" draw:end-glue-point="2" svg:d="M10042 63261c0-270-1-90-1-361" svg:viewBox="0 0 2 362">
          <text:p/>
        </draw:connector>
        <draw:connector draw:style-name="gr6" draw:text-style-name="P3" draw:layer="layout" draw:type="curve" svg:x1="10.043cm" svg:y1="69.062cm" svg:x2="10.042cm" svg:y2="68.701cm" draw:start-shape="id133" draw:start-glue-point="0" draw:end-shape="id134" draw:end-glue-point="2" svg:d="M10043 69062c0-270-1-90-1-361" svg:viewBox="0 0 2 362">
          <text:p/>
        </draw:connector>
        <draw:connector draw:style-name="gr6" draw:text-style-name="P3" draw:layer="layout" draw:type="curve" svg:x1="10.042cm" svg:y1="66.161cm" svg:x2="10.042cm" svg:y2="65.801cm" draw:start-shape="id134" draw:start-glue-point="0" draw:end-shape="id132" draw:end-glue-point="2" svg:d="M10042 66161v-360" svg:viewBox="0 0 1 361">
          <text:p/>
        </draw:connector>
        <draw:connector draw:style-name="gr6" draw:text-style-name="P3" draw:layer="layout" draw:type="curve" svg:x1="10.045cm" svg:y1="89.564cm" svg:x2="10.044cm" svg:y2="89.103cm" draw:start-shape="id135" draw:start-glue-point="0" draw:end-shape="id129" draw:end-glue-point="2" svg:d="M10045 89564c0-345-1-115-1-461" svg:viewBox="0 0 2 462">
          <text:p/>
        </draw:connector>
        <draw:connector draw:style-name="gr6" draw:text-style-name="P3" draw:layer="layout" draw:type="curve" svg:x1="10.042cm" svg:y1="71.961cm" svg:x2="10.043cm" svg:y2="71.602cm" draw:start-shape="id136" draw:start-glue-point="0" draw:end-shape="id133" draw:end-glue-point="2" svg:d="M10042 71961c0-268 1-89 1-359" svg:viewBox="0 0 2 360">
          <text:p/>
        </draw:connector>
        <draw:connector draw:style-name="gr6" draw:text-style-name="P3" draw:layer="layout" draw:type="curve" svg:x1="10.043cm" svg:y1="74.862cm" svg:x2="10.042cm" svg:y2="74.501cm" draw:start-shape="id113" draw:start-glue-point="0" draw:end-shape="id136" draw:end-glue-point="2" svg:d="M10043 74862c0-270-1-90-1-361" svg:viewBox="0 0 2 362">
          <text:p/>
        </draw:connector>
        <draw:custom-shape draw:style-name="gr7" draw:text-style-name="P6" xml:id="id131" draw:id="id131" draw:layer="layout" svg:width="3.048cm" svg:height="2.54cm" svg:x="8.522cm" svg:y="92.565cm">
          <text:p text:style-name="P4"><text:span text:style-name="T5">Jekamiah</text:span></text:p>
          <text:p text:style-name="P4"><text:span text:style-name="T4">1Ch 2:4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30" draw:id="id130" draw:layer="layout" svg:width="3.048cm" svg:height="2.54cm" svg:x="8.523cm" svg:y="95.566cm">
          <text:p text:style-name="P4"><text:span text:style-name="T5">Elishama</text:span></text:p>
          <text:p text:style-name="P4"><text:span text:style-name="T4">1Ch 2:4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10.046cm" svg:y1="92.565cm" svg:x2="10.045cm" svg:y2="92.104cm" draw:start-shape="id131" draw:start-glue-point="0" draw:end-shape="id135" draw:end-glue-point="2" svg:d="M10046 92565c0-345-1-115-1-461" svg:viewBox="0 0 2 462">
          <text:p/>
        </draw:connector>
        <draw:custom-shape draw:style-name="gr8" draw:text-style-name="P13" xml:id="id72" draw:id="id72" draw:layer="layout" svg:width="3.048cm" svg:height="2.54cm" svg:x="42.91cm" svg:y="43.301cm">
          <text:p text:style-name="P9"><text:span text:style-name="T5">Rahab</text:span></text:p>
          <text:p text:style-name="P9"><text:span text:style-name="T4">Jos 6:25</text:span></text:p>
          <text:p text:style-name="P9"><text:span text:style-name="T5">Rachab</text:span></text:p>
          <text:p text:style-name="P9"><text:span text:style-name="T4">Mat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74" draw:id="id74" draw:layer="layout" svg:width="3.048cm" svg:height="2.54cm" svg:x="42.911cm" svg:y="46.902cm">
          <text:p text:style-name="P4"><text:span text:style-name="T5">Ruth</text:span></text:p>
          <text:p text:style-name="P4"><text:span text:style-name="T4">Mat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46.809cm" svg:y1="44.57cm" svg:x2="45.958cm" svg:y2="44.571cm" draw:start-shape="id68" draw:start-glue-point="3" draw:end-shape="id72" draw:end-glue-point="1" svg:d="M46809 44570c-637 0-212 1-851 1" svg:viewBox="0 0 852 2">
          <text:p/>
        </draw:connector>
        <draw:connector draw:style-name="gr9" draw:text-style-name="P3" draw:layer="layout" draw:type="curve" svg:x1="46.809cm" svg:y1="48.17cm" svg:x2="45.959cm" svg:y2="48.172cm" draw:start-shape="id71" draw:start-glue-point="3" draw:end-shape="id74" draw:end-glue-point="1" svg:d="M46809 48170c-636 0-211 2-850 2" svg:viewBox="0 0 851 3">
          <text:p/>
        </draw:connector>
        <draw:connector draw:style-name="gr6" draw:text-style-name="P3" draw:layer="layout" draw:type="curve" svg:x1="87.736cm" svg:y1="38.259cm" svg:x2="87.723cm" svg:y2="35.498cm" draw:start-shape="id137" draw:start-glue-point="0" draw:end-shape="id48" draw:end-glue-point="2" svg:d="M87736 38259c0-2070-13-690-13-2761" svg:viewBox="0 0 14 2762">
          <text:p/>
        </draw:connector>
        <draw:connector draw:style-name="gr31" draw:text-style-name="P3" draw:layer="layout" draw:type="curve" svg:x1="91.164cm" svg:y1="81cm" svg:x2="109.467cm" svg:y2="81.465cm" draw:start-shape="id138" draw:start-glue-point="2" svg:d="M91164 81000c0 753 18303 520 18303 465" svg:viewBox="0 0 18304 543">
          <text:p/>
        </draw:connector>
        <draw:connector draw:style-name="gr31" draw:text-style-name="P3" draw:layer="layout" draw:type="curve" svg:x1="118.141cm" svg:y1="67.982cm" svg:x2="118.14cm" svg:y2="77.372cm" draw:start-shape="id139" draw:start-glue-point="2" draw:end-shape="id140" draw:end-glue-point="11" svg:d="M118141 67982c0 5889-1 1194-1 9390" svg:viewBox="0 0 2 9391">
          <text:p/>
        </draw:connector>
        <draw:connector draw:style-name="gr32" draw:text-style-name="P16" draw:layer="layout" draw:type="curve" draw:line-skew="0.616cm" svg:x1="108.645cm" svg:y1="68.96cm" svg:x2="87.736cm" svg:y2="40.799cm" draw:start-shape="id141" draw:start-glue-point="0" draw:end-shape="id137" draw:end-glue-point="2" svg:d="M108645 68960c0-20196-20909-6116-20909-28161" svg:viewBox="0 0 20910 28162">
          <text:p text:style-name="P14"><text:span text:style-name="T17">Both Hur &amp; Salma</text:span></text:p>
          <text:p text:style-name="P14"><text:span text:style-name="T17">are called the fathers</text:span></text:p>
          <text:p text:style-name="P15"><text:span text:style-name="T17">of Beth-lehem</text:span></text:p>
        </draw:connector>
        <draw:connector draw:style-name="gr2" draw:text-style-name="P3" draw:layer="layout" draw:type="curve" svg:x1="92.738cm" svg:y1="57.401cm" svg:x2="92.736cm" svg:y2="60.859cm" draw:start-shape="id142" draw:start-glue-point="2" draw:end-shape="id143" draw:end-glue-point="0" svg:d="M92738 57401c0 2595-2 866-2 3458" svg:viewBox="0 0 3 3459">
          <text:p/>
        </draw:connector>
        <draw:connector draw:style-name="gr2" draw:text-style-name="P3" draw:layer="layout" draw:type="curve" svg:x1="92.738cm" svg:y1="57.401cm" svg:x2="108.643cm" svg:y2="60.86cm" draw:start-shape="id142" draw:start-glue-point="2" draw:end-shape="id144" draw:end-glue-point="0" svg:d="M92738 57401c0 2595 15905 866 15905 3459" svg:viewBox="0 0 15906 3460">
          <text:p/>
        </draw:connector>
        <draw:connector draw:style-name="gr2" draw:text-style-name="P3" draw:layer="layout" draw:type="curve" svg:x1="134.106cm" svg:y1="60.857cm" svg:x2="92.738cm" svg:y2="57.401cm" draw:start-shape="id145" draw:start-glue-point="0" draw:end-shape="id142" draw:end-glue-point="2" svg:d="M134106 60857c0-2590-41368-863-41368-3456" svg:viewBox="0 0 41369 3457">
          <text:p/>
        </draw:connector>
        <draw:connector draw:style-name="gr2" draw:text-style-name="P3" draw:layer="layout" draw:type="curve" svg:x1="92.736cm" svg:y1="63.399cm" svg:x2="69.137cm" svg:y2="66.96cm" draw:start-shape="id143" draw:start-glue-point="2" draw:end-shape="id146" draw:end-glue-point="0" svg:d="M92736 63399c0 2671-23599 891-23599 3561" svg:viewBox="0 0 23600 3562">
          <text:p/>
        </draw:connector>
        <draw:connector draw:style-name="gr33" draw:text-style-name="P3" draw:layer="layout" draw:type="curve" svg:x1="92.736cm" svg:y1="63.399cm" svg:x2="94.992cm" svg:y2="65.461cm" draw:start-shape="id143" draw:start-glue-point="2" draw:end-shape="id147" draw:end-glue-point="0" svg:d="M92736 63399c0 1548 2256 517 2256 2062" svg:viewBox="0 0 2257 2063">
          <text:p/>
        </draw:connector>
        <draw:connector draw:style-name="gr6" draw:text-style-name="P3" draw:layer="layout" draw:type="curve" svg:x1="87.736cm" svg:y1="40.799cm" svg:x2="87.737cm" svg:y2="54.86cm" draw:start-shape="id137" draw:start-glue-point="2" draw:end-shape="id148" draw:end-glue-point="0" svg:d="M87736 40799c0 10546 1 3516 1 14061" svg:viewBox="0 0 2 14062">
          <text:p/>
        </draw:connector>
        <draw:connector draw:style-name="gr6" draw:text-style-name="P3" draw:layer="layout" draw:type="curve" svg:x1="87.738cm" svg:y1="59.861cm" svg:x2="87.737cm" svg:y2="57.4cm" draw:start-shape="id149" draw:start-glue-point="0" draw:end-shape="id148" draw:end-glue-point="2" svg:d="M87738 59861c0-1845-1-615-1-2461" svg:viewBox="0 0 2 2462">
          <text:p/>
        </draw:connector>
        <draw:custom-shape draw:style-name="gr8" draw:text-style-name="P7" xml:id="id48" draw:id="id48" draw:layer="layout" svg:width="3.048cm" svg:height="2.54cm" svg:x="86.199cm" svg:y="32.958cm">
          <text:p text:style-name="P4"><text:span text:style-name="T5">Ephrath</text:span></text:p>
          <text:p text:style-name="P4"><text:span text:style-name="T4">1Ch 2:19</text:span></text:p>
          <text:p text:style-name="P4"><text:span text:style-name="T14">Ephratah</text:span></text:p>
          <text:p text:style-name="P4"><text:span text:style-name="T4">1Ch 2: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37" draw:id="id137" draw:layer="layout" svg:width="3.048cm" svg:height="2.54cm" svg:x="86.212cm" svg:y="38.259cm">
          <text:p text:style-name="P4"><text:span text:style-name="T7">Hur</text:span></text:p>
          <text:p text:style-name="P4"><text:span text:style-name="T4">1Ch 2:19,50, 4:1,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5" xml:id="id148" draw:id="id148" draw:layer="layout" svg:width="3.048cm" svg:height="2.54cm" svg:x="86.213cm" svg:y="54.86cm">
          <text:p text:style-name="P4"><text:span text:style-name="T5">Uri</text:span></text:p>
          <text:p text:style-name="P4"><text:span text:style-name="T4">1Ch 2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49" draw:id="id149" draw:layer="layout" svg:width="3.048cm" svg:height="2.54cm" svg:x="86.214cm" svg:y="59.861cm">
          <text:p text:style-name="P4"><text:span text:style-name="T5">Bezaleel</text:span></text:p>
          <text:p text:style-name="P4"><text:span text:style-name="T4">1Ch 2:20</text:span></text:p>
          <text:p text:style-name="P4"><text:span text:style-name="T4">Exo 31:2,30, 36:1,2, 37:1, 38:22, 2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42" draw:id="id142" draw:layer="layout" svg:width="3.048cm" svg:height="2.54cm" svg:x="91.214cm" svg:y="54.861cm">
          <text:p text:style-name="P4"><text:span text:style-name="T5">Caleb</text:span></text:p>
          <text:p text:style-name="P4"><text:span text:style-name="T4">1Ch 2: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45" draw:id="id145" draw:layer="layout" svg:width="3.048cm" svg:height="2.54cm" svg:x="132.582cm" svg:y="60.857cm">
          <text:p text:style-name="P4"><text:span text:style-name="T5">Hareph</text:span></text:p>
          <text:p text:style-name="P4"><text:span text:style-name="T4">1Ch 2:5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43" draw:id="id143" draw:layer="layout" svg:width="3.048cm" svg:height="2.54cm" svg:x="91.212cm" svg:y="60.859cm">
          <text:p text:style-name="P4"><text:span text:style-name="T5">Shobal</text:span></text:p>
          <text:p text:style-name="P4"><text:span text:style-name="T4">1Ch 2: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44" draw:id="id144" draw:layer="layout" svg:width="3.048cm" svg:height="2.54cm" svg:x="107.119cm" svg:y="60.86cm">
          <text:p text:style-name="P4"><text:span text:style-name="T3">Salma</text:span></text:p>
          <text:p text:style-name="P4"><text:span text:style-name="T4">1Ch 2:5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4" draw:text-style-name="P11" xml:id="id150" draw:id="id150" draw:layer="layout" svg:width="3.708cm" svg:height="3.251cm" svg:x="90.884cm" svg:y="69.06cm">
          <text:p text:style-name="P4"><text:span text:style-name="T5">Kirjath-jearim</text:span></text:p>
          <text:p text:style-name="P4"><text:span text:style-name="T4">1Ch 2:50</text:span></text:p>
          <text:p text:style-name="P4"><text:span text:style-name="T14">Kirjath-baal</text:span></text:p>
          <text:p text:style-name="P4"><text:span text:style-name="T4">Jos 15:60</text:span></text:p>
          <text:p text:style-name="P4"><text:span text:style-name="T14">Baalah</text:span></text:p>
          <text:p text:style-name="P4"><text:span text:style-name="T4">1Ch 13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1" draw:text-style-name="P3" draw:layer="layout" draw:type="curve" svg:x1="92.738cm" svg:y1="69.06cm" svg:x2="92.736cm" svg:y2="63.399cm" draw:start-shape="id150" draw:start-glue-point="0" draw:end-shape="id143" draw:end-glue-point="2" svg:d="M92738 69060c0-4245-2-1415-2-5661" svg:viewBox="0 0 3 5662">
          <text:p/>
        </draw:connector>
        <draw:custom-shape draw:style-name="gr35" draw:text-style-name="P11" xml:id="id141" draw:id="id141" draw:layer="layout" svg:width="4.521cm" svg:height="3.759cm" svg:x="106.385cm" svg:y="68.96cm">
          <text:p text:style-name="P4"><text:span text:style-name="T5">Beth-lehem</text:span></text:p>
          <text:p text:style-name="P4"><text:span text:style-name="T4">1Ch 2:51</text:span></text:p>
          <text:p text:style-name="P4"><text:span text:style-name="T14">Ephrath</text:span></text:p>
          <text:p text:style-name="P4"><text:span text:style-name="T4">Gen 35:19, 48:7</text:span></text:p>
          <text:p text:style-name="P4"><text:span text:style-name="T14">Beth-lehem-judah</text:span></text:p>
          <text:p text:style-name="P4"><text:span text:style-name="T4">Jdg 17:7,8,9, 19:1,2,18, Rth 1:1,2, 1Sa 17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1" draw:text-style-name="P3" draw:layer="layout" draw:type="curve" svg:x1="108.645cm" svg:y1="68.96cm" svg:x2="108.643cm" svg:y2="63.4cm" draw:start-shape="id141" draw:start-glue-point="0" draw:end-shape="id144" draw:end-glue-point="2" svg:d="M108645 68960c0-4170-2-1390-2-5560" svg:viewBox="0 0 3 5561">
          <text:p/>
        </draw:connector>
        <draw:custom-shape draw:style-name="gr36" draw:text-style-name="P11" xml:id="id151" draw:id="id151" draw:layer="layout" svg:width="3.251cm" svg:height="2.54cm" svg:x="132.485cm" svg:y="65.438cm">
          <text:p text:style-name="P4"><text:span text:style-name="T5">Beth-gader</text:span></text:p>
          <text:p text:style-name="P4"><text:span text:style-name="T4">1Ch 2:5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1" draw:text-style-name="P3" draw:layer="layout" draw:type="curve" svg:x1="134.11cm" svg:y1="65.438cm" svg:x2="134.106cm" svg:y2="63.397cm" draw:start-shape="id151" draw:start-glue-point="0" draw:end-shape="id145" draw:end-glue-point="2" svg:d="M134110 65438c0-1530-4-510-4-2041" svg:viewBox="0 0 5 2042">
          <text:p/>
        </draw:connector>
        <draw:custom-shape draw:style-name="gr7" draw:text-style-name="P6" xml:id="id146" draw:id="id146" draw:layer="layout" svg:width="3.048cm" svg:height="2.54cm" svg:x="67.613cm" svg:y="66.96cm">
          <text:p text:style-name="P4"><text:span text:style-name="T5">Haroeh</text:span></text:p>
          <text:p text:style-name="P4"><text:span text:style-name="T4">1Ch 2:52</text:span></text:p>
          <text:p text:style-name="P9"><text:span text:style-name="T9">Reaiah</text:span></text:p>
          <text:p text:style-name="P9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8" xml:id="id147" draw:id="id147" draw:layer="layout" svg:width="3.556cm" svg:height="2.54cm" svg:x="93.214cm" svg:y="65.461cm">
          <text:p text:style-name="P4"><text:span text:style-name="T5">Half of the Manahethites</text:span></text:p>
          <text:p text:style-name="P4"><text:span text:style-name="T4">1Ch 2:5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8" xml:id="id154" draw:id="id154" draw:layer="layout" svg:width="3.048cm" svg:height="2.54cm" svg:x="96.81cm" svg:y="73.957cm">
          <text:p text:style-name="P4"><text:span text:style-name="T5">Mishraites</text:span></text:p>
          <text:p text:style-name="P4"><text:span text:style-name="T4">1Ch 2:5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8" xml:id="id155" draw:id="id155" draw:layer="layout" svg:width="3.048cm" svg:height="2.54cm" svg:x="86.012cm" svg:y="73.959cm">
          <text:p text:style-name="P4"><text:span text:style-name="T5">Ithrites</text:span></text:p>
          <text:p text:style-name="P4"><text:span text:style-name="T4">1Ch 2:5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8" xml:id="id152" draw:id="id152" draw:layer="layout" svg:width="3.048cm" svg:height="2.54cm" svg:x="89.512cm" svg:y="73.959cm">
          <text:p text:style-name="P4"><text:span text:style-name="T5">Puhites</text:span></text:p>
          <text:p text:style-name="P4"><text:span text:style-name="T4">1Ch 2:5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8" xml:id="id153" draw:id="id153" draw:layer="layout" svg:width="3.302cm" svg:height="2.54cm" svg:x="93.013cm" svg:y="73.96cm">
          <text:p text:style-name="P4"><text:span text:style-name="T3">Shumathites</text:span></text:p>
          <text:p text:style-name="P4"><text:span text:style-name="T4">1Ch 2:5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" draw:text-style-name="P3" draw:layer="layout" draw:type="curve" svg:x1="91.036cm" svg:y1="73.959cm" svg:x2="92.738cm" svg:y2="72.311cm" draw:start-shape="id152" draw:start-glue-point="0" svg:d="M91036 73959c0-1611 1702-787 1702-1648" svg:viewBox="0 0 1703 1649">
          <text:p/>
        </draw:connector>
        <draw:connector draw:style-name="gr15" draw:text-style-name="P3" draw:layer="layout" draw:type="curve" svg:x1="94.664cm" svg:y1="73.96cm" svg:x2="92.738cm" svg:y2="72.311cm" draw:start-shape="id153" draw:start-glue-point="0" svg:d="M94664 73960c0-1612-1926-788-1926-1649" svg:viewBox="0 0 1927 1650">
          <text:p/>
        </draw:connector>
        <draw:connector draw:style-name="gr15" draw:text-style-name="P3" draw:layer="layout" draw:type="curve" svg:x1="98.334cm" svg:y1="73.957cm" svg:x2="92.739cm" svg:y2="72.312cm" draw:start-shape="id154" draw:start-glue-point="0" svg:d="M98334 73957c0-1609-5595-787-5595-1645" svg:viewBox="0 0 5596 1646">
          <text:p/>
        </draw:connector>
        <draw:connector draw:style-name="gr15" draw:text-style-name="P3" xml:id="id190" draw:id="id190" draw:layer="layout" draw:type="curve" svg:x1="87.536cm" svg:y1="73.959cm" svg:x2="92.74cm" svg:y2="72.313cm" draw:start-shape="id155" draw:start-glue-point="0" svg:d="M87536 73959c0-1609 5204-787 5204-1646" svg:viewBox="0 0 5205 1647">
          <text:p/>
        </draw:connector>
        <draw:custom-shape draw:style-name="gr14" draw:text-style-name="P8" xml:id="id138" draw:id="id138" draw:layer="layout" svg:width="3.302cm" svg:height="2.54cm" svg:x="89.513cm" svg:y="78.46cm">
          <text:p text:style-name="P4"><text:span text:style-name="T5">Zareathites</text:span></text:p>
          <text:p text:style-name="P4"><text:span text:style-name="T18">Post-captivity</text:span><text:span text:style-name="T19">*</text:span></text:p>
          <text:p text:style-name="P4"><text:span text:style-name="T4">1Ch 2:53</text:span></text:p>
          <text:p text:style-name="P9"><text:span text:style-name="T18">Neh 11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8" xml:id="id156" draw:id="id156" draw:layer="layout" svg:width="3.302cm" svg:height="2.54cm" svg:x="93.014cm" svg:y="78.461cm">
          <text:p text:style-name="P4"><text:span text:style-name="T3">Eshtaulites</text:span></text:p>
          <text:p text:style-name="P4"><text:span text:style-name="T4">1Ch 2:53</text:span></text:p>
          <text:p text:style-name="P9"><text:span text:style-name="T20">Eshtaol</text:span></text:p>
          <text:p text:style-name="P4"><text:span text:style-name="T4">Jos 15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" draw:text-style-name="P3" draw:layer="layout" draw:type="curve" svg:x1="98.334cm" svg:y1="76.497cm" svg:x2="94.665cm" svg:y2="78.461cm" draw:start-shape="id154" draw:start-glue-point="2" draw:end-shape="id156" draw:end-glue-point="0" svg:d="M98334 76497c0 1474-3669 493-3669 1964" svg:viewBox="0 0 3670 1965">
          <text:p/>
        </draw:connector>
        <draw:connector draw:style-name="gr15" draw:text-style-name="P3" draw:layer="layout" draw:type="curve" svg:x1="94.664cm" svg:y1="76.5cm" svg:x2="94.666cm" svg:y2="78.161cm" draw:start-shape="id153" draw:start-glue-point="2" svg:d="M94664 76500c0 1623 2 793 2 1661" svg:viewBox="0 0 3 1662">
          <text:p/>
        </draw:connector>
        <draw:connector draw:style-name="gr15" draw:text-style-name="P3" draw:layer="layout" draw:type="curve" svg:x1="91.036cm" svg:y1="76.499cm" svg:x2="94.666cm" svg:y2="78.162cm" draw:start-shape="id152" draw:start-glue-point="2" svg:d="M91036 76499c0 1624 3630 793 3630 1663" svg:viewBox="0 0 3631 1664">
          <text:p/>
        </draw:connector>
        <draw:connector draw:style-name="gr15" draw:text-style-name="P3" draw:layer="layout" draw:type="curve" svg:x1="87.536cm" svg:y1="76.499cm" svg:x2="94.666cm" svg:y2="78.163cm" draw:start-shape="id155" draw:start-glue-point="2" svg:d="M87536 76499c0 1624 7130 793 7130 1664" svg:viewBox="0 0 7131 1665">
          <text:p/>
        </draw:connector>
        <draw:connector draw:style-name="gr15" draw:text-style-name="P3" draw:layer="layout" draw:type="curve" svg:x1="87.536cm" svg:y1="76.499cm" svg:x2="91.164cm" svg:y2="78.46cm" draw:start-shape="id155" draw:start-glue-point="2" draw:end-shape="id138" draw:end-glue-point="0" svg:d="M87536 76499c0 1471 3628 491 3628 1961" svg:viewBox="0 0 3629 1962">
          <text:p/>
        </draw:connector>
        <draw:connector draw:style-name="gr15" draw:text-style-name="P3" draw:layer="layout" draw:type="curve" svg:x1="91.036cm" svg:y1="76.499cm" svg:x2="91.038cm" svg:y2="78.161cm" draw:start-shape="id152" draw:start-glue-point="2" svg:d="M91036 76499c0 1623 2 792 2 1662" svg:viewBox="0 0 3 1663">
          <text:p/>
        </draw:connector>
        <draw:connector draw:style-name="gr15" draw:text-style-name="P3" draw:layer="layout" draw:type="curve" svg:x1="94.664cm" svg:y1="76.5cm" svg:x2="91.038cm" svg:y2="78.161cm" draw:start-shape="id153" draw:start-glue-point="2" svg:d="M94664 76500c0 1623-3626 793-3626 1661" svg:viewBox="0 0 3627 1662">
          <text:p/>
        </draw:connector>
        <draw:connector draw:style-name="gr15" draw:text-style-name="P3" draw:layer="layout" draw:type="curve" svg:x1="98.334cm" svg:y1="76.497cm" svg:x2="91.038cm" svg:y2="78.162cm" draw:start-shape="id154" draw:start-glue-point="2" svg:d="M98334 76497c0 1626-7296 794-7296 1665" svg:viewBox="0 0 7297 1666">
          <text:p/>
        </draw:connector>
        <draw:custom-shape draw:style-name="gr38" draw:text-style-name="P8" xml:id="id157" draw:id="id157" draw:layer="layout" svg:width="3.607cm" svg:height="2.54cm" svg:x="101.015cm" svg:y="65.44cm">
          <text:p text:style-name="P4"><text:span text:style-name="T5">Netophathites</text:span></text:p>
          <text:p text:style-name="P4"><text:span text:style-name="T4">1Ch 2:5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" draw:text-style-name="P3" draw:layer="layout" draw:type="curve" svg:x1="102.818cm" svg:y1="65.44cm" svg:x2="108.643cm" svg:y2="63.4cm" draw:start-shape="id157" draw:start-glue-point="0" draw:end-shape="id144" draw:end-glue-point="2" svg:d="M102818 65440c0-1528 5825-509 5825-2040" svg:viewBox="0 0 5826 2041">
          <text:p/>
        </draw:connector>
        <draw:custom-shape draw:style-name="gr19" draw:text-style-name="P5" xml:id="id158" draw:id="id158" draw:layer="layout" svg:width="3.048cm" svg:height="2.54cm" svg:x="105.086cm" svg:y="65.439cm">
          <text:p text:style-name="P4"><text:span text:style-name="T5">Ataroth</text:span></text:p>
          <text:p text:style-name="P4"><text:span text:style-name="T4">1Ch 2:5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06.61cm" svg:y1="65.439cm" svg:x2="108.643cm" svg:y2="63.4cm" draw:start-shape="id158" draw:start-glue-point="0" draw:end-shape="id144" draw:end-glue-point="2" svg:d="M106610 65439c0-1528 2033-509 2033-2039" svg:viewBox="0 0 2034 2040">
          <text:p/>
        </draw:connector>
        <draw:custom-shape draw:style-name="gr7" draw:text-style-name="P6" xml:id="id159" draw:id="id159" draw:layer="layout" svg:width="3.048cm" svg:height="2.54cm" svg:x="109.116cm" svg:y="65.441cm">
          <text:p text:style-name="P4"><text:span text:style-name="T5">The house of Joab</text:span></text:p>
          <text:p text:style-name="P4"><text:span text:style-name="T4">1Ch 2:5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10.64cm" svg:y1="65.441cm" svg:x2="108.643cm" svg:y2="63.4cm" draw:start-shape="id159" draw:start-glue-point="0" draw:end-shape="id144" draw:end-glue-point="2" svg:d="M110640 65441c0-1530-1997-510-1997-2041" svg:viewBox="0 0 1998 2042">
          <text:p/>
        </draw:connector>
        <draw:custom-shape draw:style-name="gr37" draw:text-style-name="P8" xml:id="id160" draw:id="id160" draw:layer="layout" svg:width="3.556cm" svg:height="2.54cm" svg:x="112.615cm" svg:y="65.44cm">
          <text:p text:style-name="P4"><text:span text:style-name="T5">Half of the Manahethites</text:span></text:p>
          <text:p text:style-name="P4"><text:span text:style-name="T4">1Ch 2:5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8" xml:id="id139" draw:id="id139" draw:layer="layout" svg:width="3.048cm" svg:height="2.54cm" svg:x="116.617cm" svg:y="65.442cm">
          <text:p text:style-name="P4"><text:span text:style-name="T5">Zorites</text:span></text:p>
          <text:p text:style-name="P4"><text:span text:style-name="T4">Pre-captivity</text:span><text:span text:style-name="T21">*</text:span></text:p>
          <text:p text:style-name="P4"><text:span text:style-name="T4">1Ch 2:54</text:span></text:p>
          <text:p text:style-name="P4"><text:span text:style-name="T4">2Ch 11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" draw:text-style-name="P3" draw:layer="layout" draw:type="curve" svg:x1="114.393cm" svg:y1="65.44cm" svg:x2="108.644cm" svg:y2="63.401cm" draw:start-shape="id160" draw:start-glue-point="0" svg:d="M114393 65440c0-1905-5749-886-5749-2039" svg:viewBox="0 0 5750 2040">
          <text:p/>
        </draw:connector>
        <draw:connector draw:style-name="gr15" draw:text-style-name="P3" draw:layer="layout" draw:type="curve" svg:x1="118.141cm" svg:y1="65.442cm" svg:x2="108.645cm" svg:y2="63.402cm" draw:start-shape="id139" draw:start-glue-point="0" svg:d="M118141 65442c0-1905-9496-885-9496-2040" svg:viewBox="0 0 9497 2041">
          <text:p/>
        </draw:connector>
        <draw:custom-shape draw:style-name="gr39" draw:text-style-name="P19" xml:id="id140" draw:id="id140" draw:layer="layout" svg:width="10.16cm" svg:height="10.16cm" svg:x="109.467cm" svg:y="75.885cm">
          <text:p text:style-name="P17"><text:span text:style-name="T22">Zorah, Zoreah, and Zareah are likely the same place known by different names signifying different periods of time (</text:span><text:span text:style-name="T23">H6881</text:span><text:span text:style-name="T22">).</text:span></text:p>
          <text:p text:style-name="P17"><text:span text:style-name="T22"/></text:p>
          <text:p text:style-name="P17"><text:span text:style-name="T22">Zoreah/Zorah &amp; Eshtaol were given to both Judah &amp; Dan</text:span></text:p>
          <text:p text:style-name="P17"><text:span text:style-name="T23">Jos 15:33, 19:41</text:span></text:p>
          <text:p text:style-name="P17"><text:span text:style-name="T22"/></text:p>
          <text:p text:style-name="P17"><text:span text:style-name="T22">Zorah, Zoreah, Zareah (Judah)</text:span></text:p>
          <text:p text:style-name="P17"><text:span text:style-name="T23">Jos 15:33, 2Ch 11:10, Neh 11:29</text:span></text:p>
          <text:p text:style-name="P17"><text:span text:style-name="T22"/></text:p>
          <text:p text:style-name="P18"><text:span text:style-name="T22">Zorah (Dan) excluding </text:span><text:span text:style-name="T23">2Ch 11:10</text:span></text:p>
          <text:p text:style-name="P17"><text:span text:style-name="T23">Jos 19:41, Jdg 13:2,25, 16:31, 18:2,8,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" xml:id="id161" draw:id="id161" draw:layer="layout" svg:width="3.099cm" svg:height="2.54cm" svg:x="97.487cm" svg:y="65.44cm">
          <text:p text:style-name="P4"><text:span text:style-name="T5">Beth-lehem</text:span></text:p>
          <text:p text:style-name="P4"><text:span text:style-name="T4">1Ch 2:5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99.036cm" svg:y1="65.44cm" svg:x2="108.644cm" svg:y2="63.401cm" draw:start-shape="id161" draw:start-glue-point="0" svg:d="M99036 65440c0-1905 9608-886 9608-2039" svg:viewBox="0 0 9609 2040">
          <text:p/>
        </draw:connector>
        <draw:connector draw:style-name="gr2" draw:text-style-name="P3" draw:layer="layout" draw:type="curve" svg:x1="129.62cm" svg:y1="35.577cm" svg:x2="129.605cm" svg:y2="34.916cm" draw:start-shape="id162" draw:start-glue-point="0" draw:end-shape="id163" draw:end-glue-point="2" svg:d="M129620 35577c0-495-15-165-15-661" svg:viewBox="0 0 16 662">
          <text:p/>
        </draw:connector>
        <draw:connector draw:style-name="gr2" draw:text-style-name="P3" draw:layer="layout" draw:type="curve" svg:x1="129.598cm" svg:y1="31.715cm" svg:x2="129.605cm" svg:y2="32.376cm" draw:start-shape="id164" draw:start-glue-point="2" draw:end-shape="id163" draw:end-glue-point="0" svg:d="M129598 31715c0 496 7 166 7 661" svg:viewBox="0 0 8 662">
          <text:p/>
        </draw:connector>
        <draw:connector draw:style-name="gr2" draw:text-style-name="P3" draw:layer="layout" draw:type="curve" svg:x1="133.997cm" svg:y1="31.766cm" svg:x2="144.497cm" svg:y2="33.874cm" draw:start-shape="id165" draw:start-glue-point="2" draw:end-shape="id166" draw:end-glue-point="0" svg:d="M133997 31766c0 1582 10500 529 10500 2108" svg:viewBox="0 0 10501 2109">
          <text:p/>
        </draw:connector>
        <draw:connector draw:style-name="gr2" draw:text-style-name="P3" draw:layer="layout" draw:type="curve" svg:x1="133.997cm" svg:y1="31.766cm" svg:x2="140.996cm" svg:y2="33.873cm" draw:start-shape="id165" draw:start-glue-point="2" draw:end-shape="id167" draw:end-glue-point="0" svg:d="M133997 31766c0 1581 6999 528 6999 2107" svg:viewBox="0 0 7000 2108">
          <text:p/>
        </draw:connector>
        <draw:connector draw:style-name="gr2" draw:text-style-name="P3" draw:layer="layout" draw:type="curve" svg:x1="133.996cm" svg:y1="27.365cm" svg:x2="129.598cm" svg:y2="29.175cm" draw:start-shape="id13" draw:start-glue-point="2" draw:end-shape="id164" draw:end-glue-point="0" svg:d="M133996 27365c0 1359-4398 454-4398 1810" svg:viewBox="0 0 4399 1811">
          <text:p/>
        </draw:connector>
        <draw:connector draw:style-name="gr2" draw:text-style-name="P3" draw:layer="layout" draw:type="curve" svg:x1="133.997cm" svg:y1="31.766cm" svg:x2="137.497cm" svg:y2="33.874cm" draw:start-shape="id165" draw:start-glue-point="2" draw:end-shape="id168" draw:end-glue-point="0" svg:d="M133997 31766c0 1582 3500 529 3500 2108" svg:viewBox="0 0 3501 2109">
          <text:p/>
        </draw:connector>
        <draw:connector draw:style-name="gr2" draw:text-style-name="P3" draw:layer="layout" draw:type="curve" svg:x1="133.997cm" svg:y1="31.766cm" svg:x2="133.997cm" svg:y2="33.874cm" draw:start-shape="id165" draw:start-glue-point="2" draw:end-shape="id169" draw:end-glue-point="0" svg:d="M133997 31766v2108" svg:viewBox="0 0 1 2109">
          <text:p/>
        </draw:connector>
        <draw:custom-shape draw:style-name="gr41" draw:text-style-name="P6" xml:id="id13" draw:id="id13" draw:layer="layout" svg:width="3.048cm" svg:height="2.692cm" svg:x="132.472cm" svg:y="24.673cm">
          <text:p text:style-name="P4"><text:span text:style-name="T5">Zerah</text:span></text:p>
          <text:p text:style-name="P4"><text:span text:style-name="T4">1Ch 2:4</text:span></text:p>
          <text:p text:style-name="P4"><text:span text:style-name="T4">Neh 11:24</text:span></text:p>
          <text:p text:style-name="P4"><text:span text:style-name="T14">Zarah</text:span></text:p>
          <text:p text:style-name="P4"><text:span text:style-name="T4">Gen 38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67" draw:id="id167" draw:layer="layout" svg:width="3.048cm" svg:height="2.54cm" svg:x="139.472cm" svg:y="33.873cm">
          <text:p text:style-name="P4"><text:span text:style-name="T5">Calcol</text:span></text:p>
          <text:p text:style-name="P4"><text:span text:style-name="T4">1Ch 2:6</text:span></text:p>
          <text:p text:style-name="P4"><text:span text:style-name="T14">Chalcol</text:span><text:span text:style-name="T24">*</text:span></text:p>
          <text:p text:style-name="P4"><text:span text:style-name="T4">1Ki 4: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68" draw:id="id168" draw:layer="layout" svg:width="3.048cm" svg:height="2.54cm" svg:x="135.973cm" svg:y="33.874cm">
          <text:p text:style-name="P4"><text:span text:style-name="T5">Heman</text:span></text:p>
          <text:p text:style-name="P4"><text:span text:style-name="T4">1Ch 2:6</text:span></text:p>
          <text:p text:style-name="P4"><text:span text:style-name="T4">1Ki 4:31</text:span><text:span text:style-name="T21">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66" draw:id="id166" draw:layer="layout" svg:width="3.048cm" svg:height="2.54cm" svg:x="142.973cm" svg:y="33.874cm">
          <text:p text:style-name="P4"><text:span text:style-name="T5">Dara</text:span></text:p>
          <text:p text:style-name="P4"><text:span text:style-name="T4">1Ch 2:6</text:span></text:p>
          <text:p text:style-name="P4"><text:span text:style-name="T14">Darda</text:span><text:span text:style-name="T24">*</text:span></text:p>
          <text:p text:style-name="P4"><text:span text:style-name="T4">1Ki 4: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69" draw:id="id169" draw:layer="layout" svg:width="3.048cm" svg:height="2.54cm" svg:x="132.473cm" svg:y="33.874cm">
          <text:p text:style-name="P4"><text:span text:style-name="T5">Ethan</text:span></text:p>
          <text:p text:style-name="P4"><text:span text:style-name="T4">1Ch 2:6</text:span></text:p>
          <text:p text:style-name="P4"><text:span text:style-name="T4">1Ki 4:31</text:span><text:span text:style-name="T21">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64" draw:id="id164" draw:layer="layout" svg:width="3.048cm" svg:height="2.54cm" svg:x="128.074cm" svg:y="29.175cm">
          <text:p text:style-name="P4"><text:span text:style-name="T5">Zimri</text:span></text:p>
          <text:p text:style-name="P4"><text:span text:style-name="T4">1Ch 2:6</text:span></text:p>
          <text:p text:style-name="P9"><text:span text:style-name="T9">Zabdi</text:span></text:p>
          <text:p text:style-name="P9"><text:span text:style-name="T4">Jos 7:1,17,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63" draw:id="id163" draw:layer="layout" svg:width="3.048cm" svg:height="2.54cm" svg:x="128.081cm" svg:y="32.376cm">
          <text:p text:style-name="P4"><text:span text:style-name="T5">Carmi</text:span></text:p>
          <text:p text:style-name="P4"><text:span text:style-name="T4">Jos 7:1,18</text:span></text:p>
          <text:p text:style-name="P4"><text:span text:style-name="T4">1Ch 2:7, 4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62" draw:id="id162" draw:layer="layout" svg:width="3.048cm" svg:height="2.54cm" svg:x="128.096cm" svg:y="35.577cm">
          <text:p text:style-name="P4"><text:span text:style-name="T5">Achar</text:span></text:p>
          <text:p text:style-name="P4"><text:span text:style-name="T4">1Ch 2:7</text:span></text:p>
          <text:p text:style-name="P4"><text:span text:style-name="T14">Achan</text:span></text:p>
          <text:p text:style-name="P4"><text:span text:style-name="T4">Jos 7:1,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70" draw:id="id170" draw:layer="layout" svg:width="3.048cm" svg:height="2.54cm" svg:x="132.482cm" svg:y="37.577cm">
          <text:p text:style-name="P4"><text:span text:style-name="T5">Azariah</text:span></text:p>
          <text:p text:style-name="P4"><text:span text:style-name="T4">1Ch 2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34.006cm" svg:y1="37.577cm" svg:x2="133.997cm" svg:y2="36.414cm" draw:start-shape="id170" draw:start-glue-point="0" draw:end-shape="id169" draw:end-glue-point="2" svg:d="M134006 37577c0-871-9-290-9-1163" svg:viewBox="0 0 10 1164">
          <text:p/>
        </draw:connector>
        <draw:custom-shape draw:style-name="gr41" draw:text-style-name="P6" xml:id="id165" draw:id="id165" draw:layer="layout" svg:width="3.048cm" svg:height="2.692cm" svg:x="132.473cm" svg:y="29.074cm">
          <text:p text:style-name="P4"><text:span text:style-name="T5">Mahol</text:span><text:span text:style-name="T25">*</text:span></text:p>
          <text:p text:style-name="P4"><text:span text:style-name="T4">1Ki 4: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33.996cm" svg:y1="27.365cm" svg:x2="133.997cm" svg:y2="29.074cm" draw:start-shape="id13" draw:start-glue-point="2" draw:end-shape="id165" draw:end-glue-point="0" svg:d="M133996 27365c0 1282 1 428 1 1709" svg:viewBox="0 0 2 1710">
          <text:p/>
        </draw:connector>
        <draw:custom-shape draw:style-name="gr42" draw:text-style-name="P21" draw:layer="layout" svg:width="16.185cm" svg:height="12.905cm" svg:x="131.528cm" svg:y="24.145cm">
          <text:p text:style-name="P20"><text:span text:style-name="T26">The connection between 1Ki 4:31 and the sons of Zerah</text:span></text:p>
          <text:p text:style-name="P20"><text:span text:style-name="T26">is not irrefutable but the resemblance is notable</text:span></text:p>
          <text:p text:style-name="P20"><text:span text:style-name="T26"/></text:p>
          <text:p text:style-name="P20"><text:span text:style-name="T26">Ezrahite (H250) &amp; Zarah (H2226) are in the same cognate group</text:span></text:p>
          <text:p text:style-name="P20"><text:span text:style-name="T26">Ethan (H387) is the same</text:span></text:p>
          <text:p text:style-name="P20"><text:span text:style-name="T26">Heman (H1968) is the same</text:span></text:p>
          <text:p text:style-name="P20"><text:span text:style-name="T23">Calcol &amp; Chalcol (</text:span><text:span text:style-name="T26">H3633) are the same</text:span></text:p>
          <text:p text:style-name="P20"><text:span text:style-name="T26">Dara (H1873) &amp; Darda (H1862) are in the same cognate group</text:span></text:p>
          <text:p text:style-name="P20"><text:span text:style-name="T26"/></text:p>
          <text:p text:style-name="P20"><text:span text:style-name="T26">It seems far more likely that the superscripts</text:span></text:p>
          <text:p text:style-name="P20"><text:span text:style-name="T26">For Psalms 88 &amp; 89 are referring to the Levites</text:span></text:p>
          <text:p text:style-name="P20"><text:span text:style-name="T26">Ethan &amp; Heman (1Ch 15:17) and not these me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69.444cm" svg:y1="32.6cm" svg:x2="48.331cm" svg:y2="30.638cm" draw:start-shape="id43" draw:start-glue-point="0" draw:end-shape="id65" draw:end-glue-point="2" svg:d="M69444 32600c0-1470-21113-489-21113-1962" svg:viewBox="0 0 21114 1963">
          <text:p/>
        </draw:connector>
        <draw:connector draw:style-name="gr9" draw:text-style-name="P3" draw:layer="layout" draw:type="curve" svg:x1="38.124cm" svg:y1="62.1cm" svg:x2="59.704cm" svg:y2="62.138cm" draw:start-shape="id82" draw:start-glue-point="0" draw:end-shape="id64" draw:end-glue-point="0" svg:d="M38124 62100c0-751 21580-770 21580 38" svg:viewBox="0 0 21581 605">
          <text:p/>
        </draw:connector>
        <draw:custom-shape draw:style-name="gr19" draw:text-style-name="P5" xml:id="id171" draw:id="id171" draw:layer="layout" svg:width="3.048cm" svg:height="2.54cm" svg:x="100.916cm" svg:y="41.631cm">
          <text:p text:style-name="P4"><text:span text:style-name="T5">Jahdai</text:span></text:p>
          <text:p text:style-name="P4"><text:span text:style-name="T4">1Ch 2:4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72" draw:id="id172" draw:layer="layout" svg:width="3.048cm" svg:height="2.54cm" svg:x="92.417cm" svg:y="47.232cm">
          <text:p text:style-name="P4"><text:span text:style-name="T5">Regem</text:span></text:p>
          <text:p text:style-name="P4"><text:span text:style-name="T4">1Ch 2:4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73" draw:id="id173" draw:layer="layout" svg:width="3.048cm" svg:height="2.54cm" svg:x="95.818cm" svg:y="47.233cm">
          <text:p text:style-name="P4"><text:span text:style-name="T5">Jotham</text:span></text:p>
          <text:p text:style-name="P4"><text:span text:style-name="T4">1Ch 2:4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74" draw:id="id174" draw:layer="layout" svg:width="3.048cm" svg:height="2.54cm" svg:x="99.219cm" svg:y="47.234cm">
          <text:p text:style-name="P4"><text:span text:style-name="T5">Geshan</text:span></text:p>
          <text:p text:style-name="P4"><text:span text:style-name="T4">1Ch 2:4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75" draw:id="id175" draw:layer="layout" svg:width="3.048cm" svg:height="2.54cm" svg:x="102.62cm" svg:y="47.235cm">
          <text:p text:style-name="P4"><text:span text:style-name="T5">Pelet</text:span></text:p>
          <text:p text:style-name="P4"><text:span text:style-name="T4">1Ch 2:4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76" draw:id="id176" draw:layer="layout" svg:width="3.048cm" svg:height="2.54cm" svg:x="106.02cm" svg:y="47.235cm">
          <text:p text:style-name="P4"><text:span text:style-name="T5">Ephah</text:span></text:p>
          <text:p text:style-name="P4"><text:span text:style-name="T4">1Ch 2:4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77" draw:id="id177" draw:layer="layout" svg:width="3.048cm" svg:height="2.54cm" svg:x="109.421cm" svg:y="47.236cm">
          <text:p text:style-name="P4"><text:span text:style-name="T5">Shaaph</text:span></text:p>
          <text:p text:style-name="P4"><text:span text:style-name="T4">1Ch 2:4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02.44cm" svg:y1="44.171cm" svg:x2="93.941cm" svg:y2="47.232cm" draw:start-shape="id171" draw:start-glue-point="2" draw:end-shape="id172" draw:end-glue-point="0" svg:d="M102440 44171c0 2296-8499 766-8499 3061" svg:viewBox="0 0 8500 3062">
          <text:p/>
        </draw:connector>
        <draw:connector draw:style-name="gr2" draw:text-style-name="P3" draw:layer="layout" draw:type="curve" svg:x1="102.44cm" svg:y1="44.171cm" svg:x2="97.342cm" svg:y2="47.233cm" draw:start-shape="id171" draw:start-glue-point="2" draw:end-shape="id173" draw:end-glue-point="0" svg:d="M102440 44171c0 2298-5098 767-5098 3062" svg:viewBox="0 0 5099 3063">
          <text:p/>
        </draw:connector>
        <draw:connector draw:style-name="gr2" draw:text-style-name="P3" draw:layer="layout" draw:type="curve" svg:x1="102.44cm" svg:y1="44.171cm" svg:x2="100.743cm" svg:y2="47.234cm" draw:start-shape="id171" draw:start-glue-point="2" draw:end-shape="id174" draw:end-glue-point="0" svg:d="M102440 44171c0 2298-1697 767-1697 3063" svg:viewBox="0 0 1698 3064">
          <text:p/>
        </draw:connector>
        <draw:connector draw:style-name="gr2" draw:text-style-name="P3" draw:layer="layout" draw:type="curve" svg:x1="102.44cm" svg:y1="44.171cm" svg:x2="104.144cm" svg:y2="47.235cm" draw:start-shape="id171" draw:start-glue-point="2" draw:end-shape="id175" draw:end-glue-point="0" svg:d="M102440 44171c0 2299 1704 768 1704 3064" svg:viewBox="0 0 1705 3065">
          <text:p/>
        </draw:connector>
        <draw:connector draw:style-name="gr2" draw:text-style-name="P3" draw:layer="layout" draw:type="curve" svg:x1="102.44cm" svg:y1="44.171cm" svg:x2="107.544cm" svg:y2="47.235cm" draw:start-shape="id171" draw:start-glue-point="2" draw:end-shape="id176" draw:end-glue-point="0" svg:d="M102440 44171c0 2299 5104 768 5104 3064" svg:viewBox="0 0 5105 3065">
          <text:p/>
        </draw:connector>
        <draw:connector draw:style-name="gr2" draw:text-style-name="P3" draw:layer="layout" draw:type="curve" svg:x1="102.44cm" svg:y1="44.171cm" svg:x2="110.945cm" svg:y2="47.236cm" draw:start-shape="id171" draw:start-glue-point="2" draw:end-shape="id177" draw:end-glue-point="0" svg:d="M102440 44171c0 2299 8505 767 8505 3065" svg:viewBox="0 0 8506 3066">
          <text:p/>
        </draw:connector>
        <draw:connector draw:style-name="gr6" draw:text-style-name="P3" draw:layer="layout" draw:type="curve" svg:x1="110.029cm" svg:y1="35.557cm" svg:x2="113.631cm" svg:y2="38.158cm" draw:start-shape="id62" draw:start-glue-point="2" draw:end-shape="id178" draw:end-glue-point="0" svg:d="M110029 35557c0 1951 3602 651 3602 2601" svg:viewBox="0 0 3603 2602">
          <text:p/>
        </draw:connector>
        <draw:connector draw:style-name="gr6" draw:text-style-name="P3" draw:layer="layout" draw:type="curve" svg:x1="110.029cm" svg:y1="35.557cm" svg:x2="110.03cm" svg:y2="38.157cm" draw:start-shape="id62" draw:start-glue-point="2" draw:end-shape="id179" draw:end-glue-point="0" svg:d="M110029 35557c0 1951 1 652 1 2600" svg:viewBox="0 0 2 2601">
          <text:p/>
        </draw:connector>
        <draw:custom-shape draw:style-name="gr8" draw:text-style-name="P7" xml:id="id62" draw:id="id62" draw:layer="layout" svg:width="3.048cm" svg:height="2.54cm" svg:x="108.505cm" svg:y="33.017cm">
          <text:p text:style-name="P4"><text:span text:style-name="T5">Maachah</text:span></text:p>
          <text:p text:style-name="P4"><text:span text:style-name="T8">concubine</text:span></text:p>
          <text:p text:style-name="P4"><text:span text:style-name="T4">1Ch 2:4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79" draw:id="id179" draw:layer="layout" svg:width="3.048cm" svg:height="2.54cm" svg:x="108.506cm" svg:y="38.157cm">
          <text:p text:style-name="P4"><text:span text:style-name="T5">Sheber</text:span></text:p>
          <text:p text:style-name="P4"><text:span text:style-name="T4">1Ch 2:4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78" draw:id="id178" draw:layer="layout" svg:width="3.048cm" svg:height="2.54cm" svg:x="112.107cm" svg:y="38.158cm">
          <text:p text:style-name="P4"><text:span text:style-name="T5">Tirhanah</text:span></text:p>
          <text:p text:style-name="P4"><text:span text:style-name="T4">1Ch 2:4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80" draw:id="id180" draw:layer="layout" svg:width="3.048cm" svg:height="2.54cm" svg:x="115.707cm" svg:y="38.158cm">
          <text:p text:style-name="P4"><text:span text:style-name="T5">Shaaph</text:span></text:p>
          <text:p text:style-name="P4"><text:span text:style-name="T4">1Ch 2:4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81" draw:id="id181" draw:layer="layout" svg:width="3.048cm" svg:height="2.54cm" svg:x="119.308cm" svg:y="38.159cm">
          <text:p text:style-name="P4"><text:span text:style-name="T5">Sheva</text:span></text:p>
          <text:p text:style-name="P4"><text:span text:style-name="T4">1Ch 2:4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110.029cm" svg:y1="35.658cm" svg:x2="117.231cm" svg:y2="38.158cm" draw:end-shape="id180" draw:end-glue-point="0" svg:d="M110029 35658c0 1500 7202 250 7202 2500" svg:viewBox="0 0 7203 2501">
          <text:p/>
        </draw:connector>
        <draw:connector draw:style-name="gr6" draw:text-style-name="P3" draw:layer="layout" draw:type="curve" svg:x1="110.029cm" svg:y1="35.658cm" svg:x2="120.832cm" svg:y2="38.159cm" draw:end-shape="id181" draw:end-glue-point="0" svg:d="M110029 35658c0 1500 10803 250 10803 2501" svg:viewBox="0 0 10804 2502">
          <text:p/>
        </draw:connector>
        <draw:custom-shape draw:style-name="gr8" draw:text-style-name="P7" xml:id="id182" draw:id="id182" draw:layer="layout" svg:width="3.048cm" svg:height="2.54cm" svg:x="122.909cm" svg:y="38.16cm">
          <text:p text:style-name="P4"><text:span text:style-name="T5">Achsah</text:span></text:p>
          <text:p text:style-name="P4"><text:span text:style-name="T4">1Ch 2:4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110.03cm" svg:y1="35.659cm" svg:x2="124.433cm" svg:y2="38.16cm" draw:end-shape="id182" draw:end-glue-point="0" svg:d="M110030 35659c0 1500 14403 250 14403 2501" svg:viewBox="0 0 14404 2502">
          <text:p/>
        </draw:connector>
        <draw:custom-shape draw:style-name="gr43" draw:text-style-name="P11" xml:id="id183" draw:id="id183" draw:layer="layout" svg:width="3.404cm" svg:height="2.54cm" svg:x="115.53cm" svg:y="41.786cm">
          <text:p text:style-name="P4"><text:span text:style-name="T5">Madmannah</text:span></text:p>
          <text:p text:style-name="P4"><text:span text:style-name="T4">1Ch 2:49</text:span></text:p>
          <text:p text:style-name="P4"><text:span text:style-name="T4">Jos 15:20,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1" draw:text-style-name="P3" draw:layer="layout" draw:type="curve" svg:x1="117.232cm" svg:y1="41.786cm" svg:x2="117.231cm" svg:y2="40.698cm" draw:start-shape="id183" draw:start-glue-point="0" draw:end-shape="id180" draw:end-glue-point="2" svg:d="M117232 41786c0-814-1-271-1-1088" svg:viewBox="0 0 2 1089">
          <text:p/>
        </draw:connector>
        <draw:custom-shape draw:style-name="gr44" draw:text-style-name="P11" xml:id="id184" draw:id="id184" draw:layer="layout" svg:width="3.2cm" svg:height="2.54cm" svg:x="119.235cm" svg:y="41.78cm">
          <text:p text:style-name="P4"><text:span text:style-name="T5">Machbenah</text:span></text:p>
          <text:p text:style-name="P4"><text:span text:style-name="T4">1Ch 2:4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6" draw:text-style-name="P11" xml:id="id185" draw:id="id185" draw:layer="layout" svg:width="3.251cm" svg:height="2.54cm" svg:x="122.978cm" svg:y="41.781cm">
          <text:p text:style-name="P4"><text:span text:style-name="T5">Gibea</text:span></text:p>
          <text:p text:style-name="P4"><text:span text:style-name="T4">1Ch 2:49</text:span></text:p>
          <text:p text:style-name="P4"><text:span text:style-name="T4">Jos 15:5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1" draw:text-style-name="P3" draw:layer="layout" draw:type="curve" svg:x1="120.835cm" svg:y1="41.78cm" svg:x2="120.832cm" svg:y2="40.699cm" draw:start-shape="id184" draw:start-glue-point="0" draw:end-shape="id181" draw:end-glue-point="2" svg:d="M120835 41780c0-810-3-270-3-1081" svg:viewBox="0 0 4 1082">
          <text:p/>
        </draw:connector>
        <draw:connector draw:style-name="gr21" draw:text-style-name="P3" draw:layer="layout" draw:type="curve" svg:x1="124.603cm" svg:y1="41.781cm" svg:x2="120.832cm" svg:y2="40.699cm" draw:start-shape="id185" draw:start-glue-point="0" draw:end-shape="id181" draw:end-glue-point="2" svg:d="M124603 41781c0-810-3771-269-3771-1082" svg:viewBox="0 0 3772 1083">
          <text:p/>
        </draw:connector>
        <draw:custom-shape draw:style-name="gr7" draw:text-style-name="P6" xml:id="id186" draw:id="id186" draw:layer="layout" svg:width="3.048cm" svg:height="2.54cm" svg:x="131.693cm" svg:y="70.31cm">
          <text:p text:style-name="P4"><text:span text:style-name="T5">The house of Rechab</text:span></text:p>
          <text:p text:style-name="P4"><text:span text:style-name="T4">1Ch 2:5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45" draw:text-style-name="P3" draw:layer="layout" draw:type="curve" svg:x1="122.041cm" svg:y1="67.981cm" svg:x2="133.217cm" svg:y2="70.31cm" draw:start-shape="id38" draw:start-glue-point="2" draw:end-shape="id186" draw:end-glue-point="0" svg:d="M122041 67981c0 1747 11176 583 11176 2329" svg:viewBox="0 0 11177 2330">
          <text:p/>
        </draw:connector>
        <draw:custom-shape draw:style-name="gr46" draw:text-style-name="P11" xml:id="id7" draw:id="id7" draw:layer="layout" svg:width="3.048cm" svg:height="2.54cm" svg:x="127.86cm" svg:y="65.439cm">
          <text:p text:style-name="P4"><text:span text:style-name="T5">Jabez</text:span></text:p>
          <text:p text:style-name="P4"><text:span text:style-name="T4">1Ch 2:5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102.436cm" svg:y1="40.676cm" svg:x2="102.44cm" svg:y2="41.631cm" draw:start-shape="id58" draw:start-glue-point="2" draw:end-shape="id171" draw:end-glue-point="0" svg:d="M102436 40676c0 717 4 240 4 955" svg:viewBox="0 0 5 956">
          <text:p/>
        </draw:connector>
        <draw:connector draw:style-name="gr2" draw:text-style-name="P3" draw:layer="layout" draw:type="curve" svg:x1="122.041cm" svg:y1="65.441cm" svg:x2="108.644cm" svg:y2="63.402cm" draw:start-shape="id38" draw:start-glue-point="0" svg:d="M122041 65441c0-1905-13397-886-13397-2039" svg:viewBox="0 0 13398 2040">
          <text:p/>
        </draw:connector>
        <draw:connector draw:style-name="gr2" draw:text-style-name="P3" draw:layer="layout" draw:type="curve" svg:x1="92.738cm" svg:y1="54.861cm" svg:x2="87.736cm" svg:y2="40.799cm" draw:start-shape="id142" draw:start-glue-point="0" draw:end-shape="id137" draw:end-glue-point="2" svg:d="M92738 54861c0-10545-5002-3514-5002-14062" svg:viewBox="0 0 5003 14063">
          <text:p/>
        </draw:connector>
        <draw:custom-shape draw:style-name="gr47" draw:text-style-name="P23" draw:layer="layout" svg:width="3.365cm" svg:height="8.661cm" svg:x="39.876cm" svg:y="61.97cm">
          <text:p text:style-name="P22"><text:span text:style-name="T26">We can’t confirm that Elihu is David’s sibling </text:span><text:span text:style-name="T27">nor can we confirm that Elihu is another name for Eliab as some have supposed</text:span><text:span text:style-name="T26">. The Bible does tell us that Jesse had </text:span><text:span text:style-name="T27">eight</text:span><text:span text:style-name="T26"> son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" draw:text-style-name="P25" draw:layer="layout" svg:width="3.409cm" svg:height="7.657cm" svg:x="50.726cm" svg:y="23.167cm">
          <text:p text:style-name="P24"><text:span text:style-name="T26">Abiah could be the unnamed mother in v9, the unnamed daughter of Machir in v21, or a third wife as is supposed he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" draw:text-style-name="P27" draw:layer="layout" svg:width="11.198cm" svg:height="2.918cm" svg:x="31.176cm" svg:y="27.936cm">
          <text:p text:style-name="P26"><text:span text:style-name="T26">As was customary, the</text:span></text:p>
          <text:p text:style-name="P26"><text:span text:style-name="T26">city Gilead was likely</text:span></text:p>
          <text:p text:style-name="P26"><text:span text:style-name="T26">named after the man</text:span></text:p>
          <text:p text:style-name="P26"><text:span text:style-name="T26">Gilead but we can’t</text:span></text:p>
          <text:p text:style-name="P26"><text:span text:style-name="T26">confirm t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29" draw:layer="layout" svg:width="12.238cm" svg:height="2.848cm" svg:x="118.811cm" svg:y="70.187cm">
          <text:p text:style-name="P28"><text:span text:style-name="T26">Keni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" draw:text-style-name="P3" draw:layer="layout" svg:width="4.612cm" svg:height="3.651cm" svg:x="67.114cm" svg:y="32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24.523cm" svg:y1="66.23cm" svg:x2="24.525cm" svg:y2="67.801cm" draw:start-shape="id78" draw:start-glue-point="2" draw:end-shape="id187" draw:end-glue-point="0" svg:d="M24523 66230c0 1179 2 394 2 1571" svg:viewBox="0 0 3 1572">
          <text:p/>
        </draw:connector>
        <draw:custom-shape draw:style-name="gr52" draw:text-style-name="P6" xml:id="id187" draw:id="id187" draw:layer="layout" svg:width="3.048cm" svg:height="2.868cm" svg:x="23.001cm" svg:y="67.801cm">
          <text:p text:style-name="P4"><text:span text:style-name="T9">Jonathan</text:span></text:p>
          <text:p text:style-name="P4"><text:span text:style-name="T4">2Sa 21:21</text:span></text:p>
          <text:p text:style-name="P4"><text:span text:style-name="T4">1Ch 20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31" xml:id="id188" draw:id="id188" draw:layer="layout" svg:width="3.048cm" svg:height="2.868cm" svg:x="26.702cm" svg:y="67.802cm">
          <text:p text:style-name="P30"><text:span text:style-name="T28">Jonadab</text:span></text:p>
          <text:p text:style-name="P30"><text:span text:style-name="T29">2Sa 13:3,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24.523cm" svg:y1="66.23cm" svg:x2="28.226cm" svg:y2="67.802cm" draw:start-shape="id78" draw:start-glue-point="2" draw:end-shape="id188" draw:end-glue-point="0" svg:d="M24523 66230c0 1179 3703 393 3703 1572" svg:viewBox="0 0 3704 1573">
          <text:p/>
        </draw:connector>
        <draw:custom-shape draw:style-name="gr53" draw:text-style-name="P23" draw:layer="layout" svg:width="4.906cm" svg:height="6.032cm" svg:x="106.166cm" svg:y="68.79cm">
          <text:p text:style-name="P22"><text:span text:style-name="T26">There is also a Bethlehem in Zebulun (Jos 19:10,15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32" draw:id="id32" draw:layer="layout" svg:width="3.048cm" svg:height="2.54cm" svg:x="76.352cm" svg:y="6.295cm">
          <text:p text:style-name="P4"><text:span text:style-name="T5">Bilhah</text:span></text:p>
          <text:p text:style-name="P4"><text:span text:style-name="T4">Gen 30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89" draw:id="id189" draw:layer="layout" svg:width="3.048cm" svg:height="2.54cm" svg:x="82.114cm" svg:y="73.967cm">
          <text:p text:style-name="P4"><text:span text:style-name="T5">Shemaiah</text:span></text:p>
          <text:p text:style-name="P4"><text:span text:style-name="T4">Jer 26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draw:line-skew="1.179cm" svg:x1="83.638cm" svg:y1="73.967cm" svg:x2="92.74cm" svg:y2="72.313cm" draw:start-shape="id189" draw:start-glue-point="0" draw:end-shape="id190" draw:end-glue-point="3" svg:d="M83638 73967c0-1537 9102-711 9102-1654" svg:viewBox="0 0 9103 1655">
          <text:p/>
        </draw:connector>
        <draw:custom-shape draw:style-name="gr7" draw:text-style-name="P6" xml:id="id191" draw:id="id191" draw:layer="layout" svg:width="3.048cm" svg:height="2.54cm" svg:x="74.514cm" svg:y="73.967cm">
          <text:p text:style-name="P4"><text:span text:style-name="T5">Abinadab</text:span></text:p>
          <text:p text:style-name="P4"><text:span text:style-name="T4">1Sa 7:1,2</text:span></text:p>
          <text:p text:style-name="P4"><text:span text:style-name="T4">2Sa 6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draw:line-skew="0.912cm" svg:x1="76.038cm" svg:y1="73.967cm" svg:x2="92.74cm" svg:y2="72.313cm" draw:start-shape="id191" draw:start-glue-point="0" draw:end-shape="id190" draw:end-glue-point="3" svg:d="M76038 73967c0-1938 16702-1111 16702-1654" svg:viewBox="0 0 16703 1655">
          <text:p/>
        </draw:connector>
        <draw:custom-shape draw:style-name="gr7" draw:text-style-name="P6" xml:id="id192" draw:id="id192" draw:layer="layout" svg:width="3.048cm" svg:height="2.54cm" svg:x="70.814cm" svg:y="77.967cm">
          <text:p text:style-name="P4"><text:span text:style-name="T5">Eleazar</text:span></text:p>
          <text:p text:style-name="P4"><text:span text:style-name="T4">1Sa 7:1,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3" draw:text-style-name="P3" draw:layer="layout" draw:type="curve" svg:x1="72.338cm" svg:y1="77.967cm" svg:x2="76.038cm" svg:y2="76.507cm" draw:start-shape="id192" draw:start-glue-point="0" draw:end-shape="id191" draw:end-glue-point="2" svg:d="M72338 77967c0-1093 3700-364 3700-1460" svg:viewBox="0 0 3701 1461">
          <text:p/>
        </draw:connector>
        <draw:custom-shape draw:style-name="gr7" draw:text-style-name="P6" xml:id="id193" draw:id="id193" draw:layer="layout" svg:width="3.048cm" svg:height="2.54cm" svg:x="74.514cm" svg:y="77.967cm">
          <text:p text:style-name="P4"><text:span text:style-name="T5">Uzzah</text:span></text:p>
          <text:p text:style-name="P9"><text:span text:style-name="T4">2Sa 6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94" draw:id="id194" draw:layer="layout" svg:width="3.048cm" svg:height="2.54cm" svg:x="78.114cm" svg:y="77.967cm">
          <text:p text:style-name="P4"><text:span text:style-name="T5">Ahio</text:span></text:p>
          <text:p text:style-name="P9"><text:span text:style-name="T4">2Sa 6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3" draw:text-style-name="P3" draw:layer="layout" draw:type="curve" svg:x1="76.038cm" svg:y1="77.967cm" svg:x2="76.038cm" svg:y2="76.507cm" draw:start-shape="id193" draw:start-glue-point="0" draw:end-shape="id191" draw:end-glue-point="2" svg:d="M76038 77967v-1460" svg:viewBox="0 0 1 1461">
          <text:p/>
        </draw:connector>
        <draw:connector draw:style-name="gr23" draw:text-style-name="P3" draw:layer="layout" draw:type="curve" svg:x1="79.638cm" svg:y1="77.967cm" svg:x2="76.038cm" svg:y2="76.507cm" draw:start-shape="id194" draw:start-glue-point="0" draw:end-shape="id191" draw:end-glue-point="2" svg:d="M79638 77967c0-1093-3600-364-3600-1460" svg:viewBox="0 0 3601 1461">
          <text:p/>
        </draw:connector>
        <draw:custom-shape draw:style-name="gr7" draw:text-style-name="P6" xml:id="id195" draw:id="id195" draw:layer="layout" svg:width="3.048cm" svg:height="2.54cm" svg:x="82.114cm" svg:y="77.967cm">
          <text:p text:style-name="P4"><text:span text:style-name="T5">Urijah</text:span></text:p>
          <text:p text:style-name="P4"><text:span text:style-name="T4">Jer 26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83.638cm" svg:y1="76.507cm" svg:x2="83.638cm" svg:y2="77.967cm" draw:start-shape="id189" draw:start-glue-point="2" draw:end-shape="id195" draw:end-glue-point="0" svg:d="M83638 76507v1460" svg:viewBox="0 0 1 1461">
          <text:p/>
        </draw:connector>
        <draw:custom-shape draw:style-name="gr7" draw:text-style-name="P6" xml:id="id196" draw:id="id196" draw:layer="layout" svg:width="3.048cm" svg:height="2.54cm" svg:x="67.613cm" svg:y="70.26cm">
          <text:p text:style-name="P4"><text:span text:style-name="T5">Jahath</text:span></text:p>
          <text:p text:style-name="P4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97" draw:id="id197" draw:layer="layout" svg:width="3.048cm" svg:height="2.54cm" svg:x="65.618cm" svg:y="73.886cm">
          <text:p text:style-name="P4"><text:span text:style-name="T5">Ahumai</text:span></text:p>
          <text:p text:style-name="P4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98" draw:id="id198" draw:layer="layout" svg:width="3.048cm" svg:height="2.54cm" svg:x="69.718cm" svg:y="73.886cm">
          <text:p text:style-name="P4"><text:span text:style-name="T5">Lahad</text:span></text:p>
          <text:p text:style-name="P4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69.137cm" svg:y1="70.26cm" svg:x2="69.137cm" svg:y2="69.5cm" draw:start-shape="id196" draw:start-glue-point="0" draw:end-shape="id146" draw:end-glue-point="2" svg:d="M69137 70260v-760" svg:viewBox="0 0 1 761">
          <text:p/>
        </draw:connector>
        <draw:connector draw:style-name="gr2" draw:text-style-name="P3" draw:layer="layout" draw:type="curve" svg:x1="67.142cm" svg:y1="73.886cm" svg:x2="69.137cm" svg:y2="72.8cm" draw:start-shape="id197" draw:start-glue-point="0" draw:end-shape="id196" draw:end-glue-point="2" svg:d="M67142 73886c0-813 1995-270 1995-1086" svg:viewBox="0 0 1996 1087">
          <text:p/>
        </draw:connector>
        <draw:connector draw:style-name="gr2" draw:text-style-name="P3" draw:layer="layout" draw:type="curve" svg:x1="71.242cm" svg:y1="73.886cm" svg:x2="69.137cm" svg:y2="72.8cm" draw:start-shape="id198" draw:start-glue-point="0" draw:end-shape="id196" draw:end-glue-point="2" svg:d="M71242 73886c0-813-2105-270-2105-1086" svg:viewBox="0 0 2106 1087">
          <text:p/>
        </draw:connector>
        <draw:custom-shape draw:style-name="gr7" draw:text-style-name="P6" xml:id="id199" draw:id="id199" draw:layer="layout" svg:width="3.048cm" svg:height="2.54cm" svg:x="137.582cm" svg:y="60.857cm">
          <text:p text:style-name="P4"><text:span text:style-name="T5">Ezer</text:span></text:p>
          <text:p text:style-name="P4"><text:span text:style-name="T4">1Ch 4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00" draw:id="id200" draw:layer="layout" svg:width="3.048cm" svg:height="2.54cm" svg:x="141.582cm" svg:y="60.857cm">
          <text:p text:style-name="P4"><text:span text:style-name="T5">Etam</text:span></text:p>
          <text:p text:style-name="P4"><text:span text:style-name="T4">1Ch 4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92.738cm" svg:y1="57.401cm" svg:x2="139.106cm" svg:y2="60.857cm" draw:start-shape="id142" draw:start-glue-point="2" draw:end-shape="id199" draw:end-glue-point="0" svg:d="M92738 57401c0 2593 46368 866 46368 3456" svg:viewBox="0 0 46369 3457">
          <text:p/>
        </draw:connector>
        <draw:connector draw:style-name="gr2" draw:text-style-name="P3" draw:layer="layout" draw:type="curve" svg:x1="92.738cm" svg:y1="57.401cm" svg:x2="143.106cm" svg:y2="60.857cm" draw:start-shape="id142" draw:start-glue-point="2" draw:end-shape="id200" draw:end-glue-point="0" svg:d="M92738 57401c0 2593 50368 866 50368 3456" svg:viewBox="0 0 50369 3457">
          <text:p/>
        </draw:connector>
        <draw:custom-shape draw:style-name="gr7" draw:text-style-name="P6" xml:id="id201" draw:id="id201" draw:layer="layout" svg:width="3.048cm" svg:height="2.54cm" svg:x="137.61cm" svg:y="64.657cm">
          <text:p text:style-name="P4"><text:span text:style-name="T5">Chelub</text:span></text:p>
          <text:p text:style-name="P4"><text:span text:style-name="T4">1Ch 4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39.134cm" svg:y1="64.657cm" svg:x2="139.106cm" svg:y2="63.397cm" draw:start-shape="id201" draw:start-glue-point="0" draw:end-shape="id199" draw:end-glue-point="2" svg:d="M139134 64657c0-943-28-314-28-1260" svg:viewBox="0 0 29 1261">
          <text:p/>
        </draw:connector>
        <draw:custom-shape draw:style-name="gr7" draw:text-style-name="P6" xml:id="id202" draw:id="id202" draw:layer="layout" svg:width="3.048cm" svg:height="2.54cm" svg:x="141.482cm" svg:y="64.657cm">
          <text:p text:style-name="P4"><text:span text:style-name="T5">Hushah</text:span></text:p>
          <text:p text:style-name="P4"><text:span text:style-name="T4">1Ch 4:4</text:span></text:p>
          <text:p text:style-name="P9"><text:span text:style-name="T9">Shuah</text:span></text:p>
          <text:p text:style-name="P9"><text:span text:style-name="T4">1Ch 4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43.006cm" svg:y1="64.657cm" svg:x2="139.106cm" svg:y2="63.397cm" draw:start-shape="id202" draw:start-glue-point="0" draw:end-shape="id199" draw:end-glue-point="2" svg:d="M143006 64657c0-943-3900-314-3900-1260" svg:viewBox="0 0 3901 1261">
          <text:p/>
        </draw:connector>
        <draw:connector draw:style-name="gr2" draw:text-style-name="P3" draw:layer="layout" draw:type="curve" svg:x1="139.106cm" svg:y1="64.657cm" svg:x2="139.106cm" svg:y2="63.397cm" svg:d="M139106 64657v-1260" svg:viewBox="0 0 1 1261">
          <text:p/>
        </draw:connector>
        <draw:custom-shape draw:style-name="gr7" draw:text-style-name="P6" xml:id="id203" draw:id="id203" draw:layer="layout" svg:width="3.048cm" svg:height="2.54cm" svg:x="141.482cm" svg:y="68.157cm">
          <text:p text:style-name="P4"><text:span text:style-name="T5">Mebunnai</text:span></text:p>
          <text:p text:style-name="P4"><text:span text:style-name="T4">2Sa 23: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43.006cm" svg:y1="67.197cm" svg:x2="143.006cm" svg:y2="68.157cm" draw:start-shape="id202" draw:start-glue-point="2" draw:end-shape="id203" draw:end-glue-point="0" svg:d="M143006 67197v960" svg:viewBox="0 0 1 961">
          <text:p/>
        </draw:connector>
        <draw:custom-shape draw:style-name="gr54" draw:text-style-name="P33" xml:id="id204" draw:id="id204" draw:layer="layout" svg:width="3.048cm" svg:height="2.54cm" svg:x="137.61cm" svg:y="68.112cm">
          <text:p text:style-name="P32"><text:span text:style-name="T30">1Ch 4:11-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5" draw:text-style-name="P3" draw:layer="layout" svg:x1="139.134cm" svg:y1="67.197cm" svg:x2="139.134cm" svg:y2="68.112cm" draw:start-shape="id201" draw:start-glue-point="2" draw:end-shape="id204" draw:end-glue-point="0" svg:d="M139134 67197v915" svg:viewBox="0 0 1 916">
          <text:p/>
        </draw:connector>
        <draw:frame draw:style-name="gr56" draw:text-style-name="P3" draw:layer="layout" svg:width="7.302cm" svg:height="3.861cm" svg:x="65.744cm" svg:y="27.73cm">
          <draw:image xlink:href="Pictures/10000001000001C2000000EEC6D7A31A.png" xlink:type="simple" xlink:show="embed" xlink:actuate="onLoad" draw:mime-type="image/png">
            <text:p/>
          </draw:image>
        </draw:frame>
        <draw:connector draw:style-name="gr6" draw:text-style-name="P3" draw:layer="layout" draw:type="curve" svg:x1="75.976cm" svg:y1="13.395cm" svg:x2="75.935cm" svg:y2="11.878cm" draw:start-shape="id16" draw:start-glue-point="0" draw:end-shape="id205" draw:end-glue-point="0" svg:d="M75976 13395c0-1098-41-340-41-1517" svg:viewBox="0 0 42 1518">
          <text:p/>
        </draw:connector>
        <draw:custom-shape draw:style-name="gr57" draw:text-style-name="P6" xml:id="id207" draw:id="id207" draw:layer="layout" svg:width="2.461cm" svg:height="1.445cm" svg:x="76.169cm" svg:y="11.153cm">
          <text:p text:style-name="P4"><text:span text:style-name="T5">Shuah</text:span></text:p>
          <text:p text:style-name="P4"><text:span text:style-name="T4">Gen 38:2,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xml:id="id205" draw:id="id205" draw:layer="layout" draw:type="curve" svg:x1="75.701cm" svg:y1="11.881cm" svg:x2="76.169cm" svg:y2="11.875cm" draw:start-shape="id206" draw:start-glue-point="1" draw:end-shape="id207" draw:end-glue-point="3" svg:d="M75701 11881c351 0 117-6 468-6" svg:viewBox="0 0 469 7">
          <text:p/>
        </draw:connector>
      </draw:page>
      <draw:page draw:name="page2" draw:style-name="dp2" draw:master-page-name="Default">
        <draw:custom-shape draw:style-name="gr1" draw:text-style-name="P35" draw:layer="layout" svg:width="18.732cm" svg:height="4.762cm" svg:x="74.64cm" svg:y="25.068cm">
          <text:p text:style-name="P34"><text:span text:style-name="T31">1 </text:span><text:span text:style-name="T32">Chronicles</text:span><text:span text:style-name="T31">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curve" svg:x1="77.759cm" svg:y1="46.177cm" svg:x2="72.436cm" svg:y2="48.136cm" draw:start-shape="id208" draw:start-glue-point="2" draw:end-shape="id209" draw:end-glue-point="0" svg:d="M77759 46177c0 1470-5323 491-5323 1959" svg:viewBox="0 0 5324 1960">
          <text:p/>
        </draw:connector>
        <draw:connector draw:style-name="gr2" draw:text-style-name="P3" draw:layer="layout" draw:type="curve" svg:x1="77.759cm" svg:y1="46.177cm" svg:x2="75.936cm" svg:y2="48.136cm" draw:start-shape="id208" draw:start-glue-point="2" draw:end-shape="id210" draw:end-glue-point="0" svg:d="M77759 46177c0 1470-1823 491-1823 1959" svg:viewBox="0 0 1824 1960">
          <text:p/>
        </draw:connector>
        <draw:connector draw:style-name="gr2" draw:text-style-name="P3" draw:layer="layout" draw:type="curve" svg:x1="77.759cm" svg:y1="46.177cm" svg:x2="79.536cm" svg:y2="48.136cm" draw:start-shape="id208" draw:start-glue-point="2" draw:end-shape="id211" draw:end-glue-point="0" svg:d="M77759 46177c0 1470 1777 491 1777 1959" svg:viewBox="0 0 1778 1960">
          <text:p/>
        </draw:connector>
        <draw:connector draw:style-name="gr2" draw:text-style-name="P3" draw:layer="layout" draw:type="curve" svg:x1="77.759cm" svg:y1="46.177cm" svg:x2="83.237cm" svg:y2="48.137cm" draw:start-shape="id208" draw:start-glue-point="2" draw:end-shape="id212" draw:end-glue-point="0" svg:d="M77759 46177c0 1470 5478 490 5478 1960" svg:viewBox="0 0 5479 1961">
          <text:p/>
        </draw:connector>
        <draw:connector draw:style-name="gr3" draw:text-style-name="P3" draw:layer="layout" draw:type="curve" svg:x1="125.706cm" svg:y1="70.327cm" svg:x2="129.384cm" svg:y2="67.979cm" draw:start-shape="id213" draw:start-glue-point="0" draw:end-shape="id214" draw:end-glue-point="2" svg:d="M125706 70327c0-1759 3678-586 3678-2348" svg:viewBox="0 0 3679 2349">
          <text:p/>
        </draw:connector>
        <draw:connector draw:style-name="gr3" draw:text-style-name="P3" draw:layer="layout" draw:type="curve" svg:x1="122.07cm" svg:y1="70.326cm" svg:x2="129.384cm" svg:y2="67.979cm" draw:start-shape="id215" draw:start-glue-point="0" draw:end-shape="id214" draw:end-glue-point="2" svg:d="M122070 70326c0-1759 7314-586 7314-2347" svg:viewBox="0 0 7315 2348">
          <text:p/>
        </draw:connector>
        <draw:connector draw:style-name="gr3" draw:text-style-name="P3" draw:layer="layout" draw:type="curve" svg:x1="129.376cm" svg:y1="70.324cm" svg:x2="129.384cm" svg:y2="67.979cm" draw:start-shape="id216" draw:start-glue-point="0" draw:end-shape="id214" draw:end-glue-point="2" svg:d="M129376 70324c0-1758 8-586 8-2345" svg:viewBox="0 0 9 2346">
          <text:p/>
        </draw:connector>
        <draw:custom-shape draw:style-name="gr4" draw:text-style-name="P5" xml:id="id245" draw:id="id245" draw:layer="layout" svg:width="3.302cm" svg:height="2.54cm" svg:x="120.39cm" svg:y="65.441cm">
          <text:p text:style-name="P4"><text:span text:style-name="T3">Hemath</text:span></text:p>
          <text:p text:style-name="P4"><text:span text:style-name="T4">1Ch 2: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" draw:text-style-name="P3" draw:layer="layout" draw:type="curve" svg:x1="44.153cm" svg:y1="23.993cm" svg:x2="99.576cm" svg:y2="20.835cm" draw:start-shape="id217" draw:start-glue-point="0" draw:end-shape="id218" draw:end-glue-point="2" svg:d="M44153 23993c0-2367 55423-788 55423-3158" svg:viewBox="0 0 55424 3159">
          <text:p/>
        </draw:connector>
        <draw:connector draw:style-name="gr6" draw:text-style-name="P3" draw:layer="layout" draw:type="curve" svg:x1="72.377cm" svg:y1="19.836cm" svg:x2="133.996cm" svg:y2="24.673cm" draw:start-shape="id219" draw:start-glue-point="2" draw:end-shape="id220" draw:end-glue-point="0" svg:d="M72377 19836c0 3628 61619 1210 61619 4837" svg:viewBox="0 0 61620 4838">
          <text:p/>
        </draw:connector>
        <draw:custom-shape draw:style-name="gr7" draw:text-style-name="P6" xml:id="id221" draw:id="id221" draw:layer="layout" svg:width="3.048cm" svg:height="2.54cm" svg:x="81.149cm" svg:y="4.892cm">
          <text:p text:style-name="P4"><text:span text:style-name="T5">Israel</text:span></text:p>
          <text:p text:style-name="P4"><text:span text:style-name="T4">1Ch 2:1</text:span></text:p>
          <text:p text:style-name="P4"><text:span text:style-name="T5">Jacob</text:span></text:p>
          <text:p text:style-name="P4"><text:span text:style-name="T6">Gen 35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31" draw:id="id231" draw:layer="layout" svg:width="3.048cm" svg:height="2.54cm" svg:x="91.75cm" svg:y="13.393cm">
          <text:p text:style-name="P4"><text:span text:style-name="T5">Issachar</text:span></text:p>
          <text:p text:style-name="P4"><text:span text:style-name="T4">1Ch 2:1</text:span></text:p>
          <text:p text:style-name="P4"><text:span text:style-name="T4">Gen 30:17,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26" draw:id="id226" draw:layer="layout" svg:width="3.048cm" svg:height="2.54cm" svg:x="95.15cm" svg:y="13.393cm">
          <text:p text:style-name="P4"><text:span text:style-name="T5">Zebulun</text:span></text:p>
          <text:p text:style-name="P4"><text:span text:style-name="T4">1Ch 2:1</text:span></text:p>
          <text:p text:style-name="P4"><text:span text:style-name="T4">Gen 30:19,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225" draw:id="id225" draw:layer="layout" svg:width="3.048cm" svg:height="2.54cm" svg:x="98.551cm" svg:y="13.394cm">
          <text:p text:style-name="P4"><text:span text:style-name="T5">Dinah</text:span></text:p>
          <text:p text:style-name="P4"><text:span text:style-name="T4">Gen 30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33" draw:id="id233" draw:layer="layout" svg:width="3.048cm" svg:height="2.54cm" svg:x="101.951cm" svg:y="13.394cm">
          <text:p text:style-name="P4"><text:span text:style-name="T5">Joseph</text:span></text:p>
          <text:p text:style-name="P4"><text:span text:style-name="T4">1Ch 2:2</text:span></text:p>
          <text:p text:style-name="P4"><text:span text:style-name="T4">Gen 30:23,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36" draw:id="id236" draw:layer="layout" svg:width="3.048cm" svg:height="2.54cm" svg:x="84.851cm" svg:y="13.394cm">
          <text:p text:style-name="P4"><text:span text:style-name="T5">Gad</text:span></text:p>
          <text:p text:style-name="P4"><text:span text:style-name="T4">1Ch 2:2</text:span></text:p>
          <text:p text:style-name="P4"><text:span text:style-name="T4">Gen 30:10,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38" draw:id="id238" draw:layer="layout" svg:width="3.048cm" svg:height="2.54cm" svg:x="88.251cm" svg:y="13.394cm">
          <text:p text:style-name="P4"><text:span text:style-name="T5">Asher</text:span></text:p>
          <text:p text:style-name="P4"><text:span text:style-name="T4">1Ch 2:2</text:span></text:p>
          <text:p text:style-name="P4"><text:span text:style-name="T4">Gen 30:12,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40" draw:id="id240" draw:layer="layout" svg:width="3.048cm" svg:height="2.54cm" svg:x="77.951cm" svg:y="13.394cm">
          <text:p text:style-name="P4"><text:span text:style-name="T5">Dan</text:span></text:p>
          <text:p text:style-name="P4"><text:span text:style-name="T4">1Ch 2:2</text:span></text:p>
          <text:p text:style-name="P4"><text:span text:style-name="T4">Gen 30:5,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41" draw:id="id241" draw:layer="layout" svg:width="3.048cm" svg:height="2.54cm" svg:x="81.351cm" svg:y="13.394cm">
          <text:p text:style-name="P4"><text:span text:style-name="T5">Naphtali</text:span></text:p>
          <text:p text:style-name="P4"><text:span text:style-name="T4">1Ch 2:2</text:span></text:p>
          <text:p text:style-name="P4"><text:span text:style-name="T4">Gen 30:7,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35" draw:id="id235" draw:layer="layout" svg:width="3.048cm" svg:height="2.54cm" svg:x="105.352cm" svg:y="13.395cm">
          <text:p text:style-name="P4"><text:span text:style-name="T5">Benjamin</text:span></text:p>
          <text:p text:style-name="P4"><text:span text:style-name="T4">1Ch 2:2</text:span></text:p>
          <text:p text:style-name="P4"><text:span text:style-name="T4">Gen 35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28" draw:id="id228" draw:layer="layout" svg:width="3.048cm" svg:height="2.54cm" svg:x="67.152cm" svg:y="13.395cm">
          <text:p text:style-name="P4"><text:span text:style-name="T5">Levi</text:span></text:p>
          <text:p text:style-name="P4"><text:span text:style-name="T4">1Ch 2:1</text:span></text:p>
          <text:p text:style-name="P4"><text:span text:style-name="T4">Gen 29: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29" draw:id="id229" draw:layer="layout" svg:width="3.048cm" svg:height="2.54cm" svg:x="70.852cm" svg:y="13.395cm">
          <text:p text:style-name="P4"><text:span text:style-name="T5">Judah</text:span></text:p>
          <text:p text:style-name="P4"><text:span text:style-name="T4">1Ch 2:1</text:span></text:p>
          <text:p text:style-name="P4"><text:span text:style-name="T4">Gen 29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27" draw:id="id227" draw:layer="layout" svg:width="3.048cm" svg:height="2.54cm" svg:x="60.252cm" svg:y="13.395cm">
          <text:p text:style-name="P4"><text:span text:style-name="T7">Reuben</text:span></text:p>
          <text:p text:style-name="P4"><text:span text:style-name="T4">1Ch 2:1, 5:3</text:span></text:p>
          <text:p text:style-name="P4"><text:span text:style-name="T4">Gen 29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30" draw:id="id230" draw:layer="layout" svg:width="3.048cm" svg:height="2.54cm" svg:x="63.652cm" svg:y="13.395cm">
          <text:p text:style-name="P4"><text:span text:style-name="T5">Simeon</text:span></text:p>
          <text:p text:style-name="P4"><text:span text:style-name="T4">1Ch 2:1</text:span></text:p>
          <text:p text:style-name="P4"><text:span text:style-name="T4">Gen 29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237" draw:id="id237" draw:layer="layout" svg:width="3.048cm" svg:height="2.54cm" svg:x="86.051cm" svg:y="6.294cm">
          <text:p text:style-name="P4"><text:span text:style-name="T5">Zilpah</text:span></text:p>
          <text:p text:style-name="P4"><text:span text:style-name="T4">Gen 30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234" draw:id="id234" draw:layer="layout" svg:width="3.048cm" svg:height="2.54cm" svg:x="90.051cm" svg:y="3.494cm">
          <text:p text:style-name="P4"><text:span text:style-name="T5">Rachel</text:span></text:p>
          <text:p text:style-name="P4"><text:span text:style-name="T4">Gen 30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222" draw:id="id222" draw:layer="layout" svg:width="3.048cm" svg:height="2.54cm" svg:x="72.252cm" svg:y="3.595cm">
          <text:p text:style-name="P4"><text:span text:style-name="T5">Leah</text:span></text:p>
          <text:p text:style-name="P4"><text:span text:style-name="T4">Gen 29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81.149cm" svg:y1="6.162cm" svg:x2="75.3cm" svg:y2="4.865cm" draw:start-shape="id221" draw:start-glue-point="3" draw:end-shape="id222" draw:end-glue-point="1" svg:d="M81149 6162c-4386 0-1462-1297-5849-1297" svg:viewBox="0 0 5850 1298">
          <text:p/>
        </draw:connector>
        <draw:connector draw:style-name="gr6" draw:text-style-name="P3" draw:layer="layout" draw:type="curve" svg:x1="75.976cm" svg:y1="15.935cm" svg:x2="75.977cm" svg:y2="17.296cm" draw:start-shape="id223" draw:start-glue-point="2" draw:end-shape="id224" draw:end-glue-point="0" svg:d="M75976 15935c0 1021 1 341 1 1361" svg:viewBox="0 0 2 1362">
          <text:p/>
        </draw:connector>
        <draw:connector draw:style-name="gr5" draw:text-style-name="P3" draw:layer="layout" draw:type="curve" svg:x1="73.776cm" svg:y1="6.135cm" svg:x2="100.075cm" svg:y2="13.394cm" draw:start-shape="id222" draw:start-glue-point="2" draw:end-shape="id225" draw:end-glue-point="0" svg:d="M73776 6135c0 5445 26299 1816 26299 7259" svg:viewBox="0 0 26300 7260">
          <text:p/>
        </draw:connector>
        <draw:connector draw:style-name="gr5" draw:text-style-name="P3" draw:layer="layout" draw:type="curve" svg:x1="73.776cm" svg:y1="6.135cm" svg:x2="96.674cm" svg:y2="13.393cm" draw:start-shape="id222" draw:start-glue-point="2" draw:end-shape="id226" draw:end-glue-point="0" svg:d="M73776 6135c0 5445 22898 1816 22898 7258" svg:viewBox="0 0 22899 7259">
          <text:p/>
        </draw:connector>
        <draw:connector draw:style-name="gr5" draw:text-style-name="P3" draw:layer="layout" draw:type="curve" svg:x1="61.776cm" svg:y1="13.395cm" svg:x2="73.776cm" svg:y2="6.135cm" draw:start-shape="id227" draw:start-glue-point="0" draw:end-shape="id222" draw:end-glue-point="2" svg:d="M61776 13395c0-5443 12000-1814 12000-7260" svg:viewBox="0 0 12001 7261">
          <text:p/>
        </draw:connector>
        <draw:connector draw:style-name="gr5" draw:text-style-name="P3" draw:layer="layout" draw:type="curve" svg:x1="73.776cm" svg:y1="6.135cm" svg:x2="68.676cm" svg:y2="13.395cm" draw:start-shape="id222" draw:start-glue-point="2" draw:end-shape="id228" draw:end-glue-point="0" svg:d="M73776 6135c0 5446-5100 1817-5100 7260" svg:viewBox="0 0 5101 7261">
          <text:p/>
        </draw:connector>
        <draw:connector draw:style-name="gr5" draw:text-style-name="P3" draw:layer="layout" draw:type="curve" svg:x1="73.776cm" svg:y1="6.135cm" svg:x2="72.376cm" svg:y2="13.395cm" draw:start-shape="id222" draw:start-glue-point="2" draw:end-shape="id229" draw:end-glue-point="0" svg:d="M73776 6135c0 5446-1400 1817-1400 7260" svg:viewBox="0 0 1401 7261">
          <text:p/>
        </draw:connector>
        <draw:connector draw:style-name="gr5" draw:text-style-name="P3" draw:layer="layout" draw:type="curve" svg:x1="73.776cm" svg:y1="6.135cm" svg:x2="65.176cm" svg:y2="13.395cm" draw:start-shape="id222" draw:start-glue-point="2" draw:end-shape="id230" draw:end-glue-point="0" svg:d="M73776 6135c0 5446-8600 1817-8600 7260" svg:viewBox="0 0 8601 7261">
          <text:p/>
        </draw:connector>
        <draw:connector draw:style-name="gr5" draw:text-style-name="P3" draw:layer="layout" draw:type="curve" svg:x1="73.776cm" svg:y1="6.135cm" svg:x2="93.274cm" svg:y2="13.393cm" draw:start-shape="id222" draw:start-glue-point="2" draw:end-shape="id231" draw:end-glue-point="0" svg:d="M73776 6135c0 5445 19498 1816 19498 7258" svg:viewBox="0 0 19499 7259">
          <text:p/>
        </draw:connector>
        <draw:connector draw:style-name="gr6" draw:text-style-name="P3" draw:layer="layout" draw:type="curve" svg:x1="75.976cm" svg:y1="15.935cm" svg:x2="79.476cm" svg:y2="17.295cm" draw:start-shape="id223" draw:start-glue-point="2" draw:end-shape="id232" draw:end-glue-point="0" svg:d="M75976 15935c0 1021 3500 342 3500 1360" svg:viewBox="0 0 3501 1361">
          <text:p/>
        </draw:connector>
        <draw:connector draw:style-name="gr6" draw:text-style-name="P3" draw:layer="layout" draw:type="curve" svg:x1="103.475cm" svg:y1="13.394cm" svg:x2="91.575cm" svg:y2="6.034cm" draw:start-shape="id233" draw:start-glue-point="0" draw:end-shape="id234" svg:d="M103475 13394c0-5518-11900-1839-11900-7360" svg:viewBox="0 0 11901 7361">
          <text:p/>
        </draw:connector>
        <draw:connector draw:style-name="gr6" draw:text-style-name="P3" draw:layer="layout" draw:type="curve" svg:x1="106.876cm" svg:y1="13.395cm" svg:x2="91.575cm" svg:y2="6.034cm" draw:start-shape="id235" draw:start-glue-point="0" draw:end-shape="id234" draw:end-glue-point="2" svg:d="M106876 13395c0-5520-15301-1840-15301-7361" svg:viewBox="0 0 15302 7362">
          <text:p/>
        </draw:connector>
        <draw:connector draw:style-name="gr6" draw:text-style-name="P3" draw:layer="layout" draw:type="curve" svg:x1="86.375cm" svg:y1="13.394cm" svg:x2="87.575cm" svg:y2="8.834cm" draw:start-shape="id236" draw:start-glue-point="0" draw:end-shape="id237" draw:end-glue-point="2" svg:d="M86375 13394c0-3418 1200-1139 1200-4560" svg:viewBox="0 0 1201 4561">
          <text:p/>
        </draw:connector>
        <draw:connector draw:style-name="gr6" draw:text-style-name="P3" draw:layer="layout" draw:type="curve" svg:x1="89.775cm" svg:y1="13.394cm" svg:x2="87.575cm" svg:y2="8.834cm" draw:start-shape="id238" draw:start-glue-point="0" draw:end-shape="id237" draw:end-glue-point="2" svg:d="M89775 13394c0-3418-2200-1139-2200-4560" svg:viewBox="0 0 2201 4561">
          <text:p/>
        </draw:connector>
        <draw:connector draw:style-name="gr9" draw:text-style-name="P3" draw:layer="layout" draw:type="curve" svg:x1="79.4cm" svg:y1="7.565cm" svg:x2="81.149cm" svg:y2="6.162cm" draw:start-shape="id239" draw:start-glue-point="1" draw:end-shape="id221" draw:end-glue-point="3" svg:d="M79400 7565c1312 0 438-1403 1749-1403" svg:viewBox="0 0 1750 1404">
          <text:p/>
        </draw:connector>
        <draw:connector draw:style-name="gr6" draw:text-style-name="P3" draw:layer="layout" draw:type="curve" svg:x1="77.876cm" svg:y1="8.835cm" svg:x2="79.475cm" svg:y2="13.394cm" draw:start-shape="id239" draw:start-glue-point="2" draw:end-shape="id240" draw:end-glue-point="0" svg:d="M77876 8835c0 3420 1599 1141 1599 4559" svg:viewBox="0 0 1600 4560">
          <text:p/>
        </draw:connector>
        <draw:connector draw:style-name="gr6" draw:text-style-name="P3" draw:layer="layout" draw:type="curve" svg:x1="77.876cm" svg:y1="8.835cm" svg:x2="82.875cm" svg:y2="13.394cm" draw:start-shape="id239" draw:start-glue-point="2" draw:end-shape="id241" draw:end-glue-point="0" svg:d="M77876 8835c0 3420 4999 1141 4999 4559" svg:viewBox="0 0 5000 4560">
          <text:p/>
        </draw:connector>
        <draw:connector draw:style-name="gr9" draw:text-style-name="P3" draw:layer="layout" draw:type="curve" svg:x1="86.051cm" svg:y1="7.564cm" svg:x2="84.197cm" svg:y2="6.162cm" draw:start-shape="id237" draw:start-glue-point="3" draw:end-shape="id221" draw:end-glue-point="1" svg:d="M86051 7564c-1389 0-462-1402-1854-1402" svg:viewBox="0 0 1855 1403">
          <text:p/>
        </draw:connector>
        <draw:connector draw:style-name="gr9" draw:text-style-name="P3" draw:layer="layout" draw:type="curve" svg:x1="90.051cm" svg:y1="4.764cm" svg:x2="84.197cm" svg:y2="6.162cm" draw:start-shape="id234" draw:start-glue-point="3" draw:end-shape="id221" draw:end-glue-point="1" svg:d="M90051 4764c-4389 0-1462 1398-5854 1398" svg:viewBox="0 0 5855 1399">
          <text:p/>
        </draw:connector>
        <draw:custom-shape draw:style-name="gr7" draw:text-style-name="P6" xml:id="id232" draw:id="id232" draw:layer="layout" svg:width="3.048cm" svg:height="2.54cm" svg:x="77.952cm" svg:y="17.295cm">
          <text:p text:style-name="P4"><text:span text:style-name="T5">Onan</text:span></text:p>
          <text:p text:style-name="P4"><text:span text:style-name="T4">1Ch 2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24" draw:id="id224" draw:layer="layout" svg:width="3.048cm" svg:height="2.54cm" svg:x="74.453cm" svg:y="17.296cm">
          <text:p text:style-name="P4"><text:span text:style-name="T7">Er</text:span></text:p>
          <text:p text:style-name="P4"><text:span text:style-name="T4">1Ch 2:3</text:span></text:p>
          <text:p text:style-name="P4"><text:span text:style-name="T4">Gen 38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42" draw:id="id242" draw:layer="layout" svg:width="3.048cm" svg:height="2.54cm" svg:x="81.453cm" svg:y="17.296cm">
          <text:p text:style-name="P4"><text:span text:style-name="T5">Shelah</text:span></text:p>
          <text:p text:style-name="P4"><text:span text:style-name="T4">1Ch 2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75.976cm" svg:y1="15.935cm" svg:x2="82.977cm" svg:y2="17.296cm" draw:start-shape="id223" draw:end-shape="id242" draw:end-glue-point="0" svg:d="M75976 15935c0 1021 7001 341 7001 1361" svg:viewBox="0 0 7002 1362">
          <text:p/>
        </draw:connector>
        <draw:custom-shape draw:style-name="gr8" draw:text-style-name="P7" xml:id="id223" draw:id="id223" draw:layer="layout" svg:width="3.048cm" svg:height="2.54cm" svg:x="74.452cm" svg:y="13.395cm">
          <text:p text:style-name="P4"><text:span text:style-name="T5">Unnamed </text:span><text:span text:style-name="T8">Canaanitess</text:span></text:p>
          <text:p text:style-name="P4"><text:span text:style-name="T4">Gen 38:2,12</text:span></text:p>
          <text:p text:style-name="P4"><text:span text:style-name="T4">1Ch 2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7" xml:id="id413" draw:id="id413" draw:layer="layout" svg:width="3.045cm" svg:height="1.571cm" svg:x="72.656cm" svg:y="11.096cm">
          <text:p text:style-name="P4"><text:span text:style-name="T9">Shua</text:span></text:p>
          <text:p text:style-name="P4"><text:span text:style-name="T10">Canaanitess</text:span></text:p>
          <text:p text:style-name="P4"><text:span text:style-name="T10">1Ch 2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72.376cm" svg:y1="15.935cm" svg:x2="72.377cm" svg:y2="17.296cm" draw:start-shape="id229" draw:start-glue-point="2" draw:end-shape="id219" draw:end-glue-point="0" svg:d="M72376 15935c0 1021 1 341 1 1361" svg:viewBox="0 0 2 1362">
          <text:p/>
        </draw:connector>
        <draw:connector draw:style-name="gr9" draw:text-style-name="P3" draw:layer="layout" draw:type="curve" svg:x1="74.452cm" svg:y1="14.665cm" svg:x2="73.9cm" svg:y2="14.665cm" draw:start-shape="id223" draw:start-glue-point="3" draw:end-shape="id229" draw:end-glue-point="1" svg:d="M74452 14665h-552" svg:viewBox="0 0 553 1">
          <text:p/>
        </draw:connector>
        <draw:custom-shape draw:style-name="gr8" draw:text-style-name="P7" xml:id="id219" draw:id="id219" draw:layer="layout" svg:width="3.048cm" svg:height="2.54cm" svg:x="70.853cm" svg:y="17.296cm">
          <text:p text:style-name="P4"><text:span text:style-name="T5">Tamar</text:span></text:p>
          <text:p text:style-name="P4"><text:span text:style-name="T4">1Ch 2:4</text:span></text:p>
          <text:p text:style-name="P4"><text:span text:style-name="T4">Gen 38:24-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6" xml:id="id243" draw:id="id243" draw:layer="layout" svg:width="3.099cm" svg:height="2.54cm" svg:x="101.936cm" svg:y="18.295cm">
          <text:p text:style-name="P4"><text:span text:style-name="T7">Manasseh</text:span></text:p>
          <text:p text:style-name="P4"><text:span text:style-name="T4">Num 26:28,29</text:span></text:p>
          <text:p text:style-name="P4"><text:span text:style-name="T4">Jos 17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103.485cm" svg:y1="18.295cm" svg:x2="103.475cm" svg:y2="15.934cm" draw:start-shape="id243" draw:start-glue-point="0" draw:end-shape="id233" draw:end-glue-point="2" svg:d="M103485 18295c0-1770-10-590-10-2361" svg:viewBox="0 0 11 2362">
          <text:p/>
        </draw:connector>
        <draw:custom-shape draw:style-name="gr8" draw:text-style-name="P7" xml:id="id218" draw:id="id218" draw:layer="layout" svg:width="3.048cm" svg:height="2.54cm" svg:x="98.052cm" svg:y="18.295cm">
          <text:p text:style-name="P4"><text:span text:style-name="T5">Concubine</text:span></text:p>
          <text:p text:style-name="P4"><text:span text:style-name="T4">the Aramitess</text:span></text:p>
          <text:p text:style-name="P4"><text:span text:style-name="T4">(Syrian)</text:span></text:p>
          <text:p text:style-name="P4"><text:span text:style-name="T4">1Ch 7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101.936cm" svg:y1="19.565cm" svg:x2="101.1cm" svg:y2="19.565cm" draw:start-shape="id243" draw:start-glue-point="3" draw:end-shape="id218" draw:end-glue-point="1" svg:d="M101936 19565h-836" svg:viewBox="0 0 837 1">
          <text:p/>
        </draw:connector>
        <draw:connector draw:style-name="gr12" draw:text-style-name="P3" draw:layer="layout" draw:type="curve" svg:x1="74.453cm" svg:y1="18.566cm" svg:x2="73.901cm" svg:y2="18.566cm" draw:start-shape="id224" draw:start-glue-point="3" draw:end-shape="id219" draw:end-glue-point="1" svg:d="M74453 18566h-552" svg:viewBox="0 0 553 1">
          <text:p/>
        </draw:connector>
        <draw:connector draw:style-name="gr6" draw:text-style-name="P3" draw:layer="layout" draw:type="curve" svg:x1="48.314cm" svg:y1="23.997cm" svg:x2="72.377cm" svg:y2="19.836cm" draw:start-shape="id244" draw:start-glue-point="0" draw:end-shape="id219" svg:d="M48314 23997c0-3120 24063-1040 24063-4161" svg:viewBox="0 0 24064 4162">
          <text:p/>
        </draw:connector>
        <draw:custom-shape draw:style-name="gr13" draw:text-style-name="P8" xml:id="id216" draw:id="id216" draw:layer="layout" svg:width="3.048cm" svg:height="2.54cm" svg:x="127.852cm" svg:y="70.324cm">
          <text:p text:style-name="P4"><text:span text:style-name="T5">Suchathites</text:span></text:p>
          <text:p text:style-name="P4"><text:span text:style-name="T4">1Ch 2: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8" xml:id="id215" draw:id="id215" draw:layer="layout" svg:width="3.048cm" svg:height="2.54cm" svg:x="120.546cm" svg:y="70.326cm">
          <text:p text:style-name="P4"><text:span text:style-name="T5">Tirathites</text:span></text:p>
          <text:p text:style-name="P4"><text:span text:style-name="T4">1Ch 2: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8" xml:id="id213" draw:id="id213" draw:layer="layout" svg:width="3.302cm" svg:height="2.54cm" svg:x="124.055cm" svg:y="70.327cm">
          <text:p text:style-name="P4"><text:span text:style-name="T3">Shimeathites</text:span></text:p>
          <text:p text:style-name="P4"><text:span text:style-name="T4">1Ch 2: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" draw:text-style-name="P3" draw:layer="layout" draw:type="curve" svg:x1="122.041cm" svg:y1="67.981cm" svg:x2="122.07cm" svg:y2="70.326cm" draw:start-shape="id245" draw:start-glue-point="2" draw:end-shape="id215" draw:end-glue-point="0" svg:d="M122041 67981c0 1759 29 587 29 2345" svg:viewBox="0 0 30 2346">
          <text:p/>
        </draw:connector>
        <draw:connector draw:style-name="gr15" draw:text-style-name="P3" draw:layer="layout" draw:type="curve" svg:x1="122.041cm" svg:y1="67.981cm" svg:x2="125.706cm" svg:y2="70.327cm" draw:start-shape="id245" draw:start-glue-point="2" draw:end-shape="id213" draw:end-glue-point="0" svg:d="M122041 67981c0 1761 3665 588 3665 2346" svg:viewBox="0 0 3666 2347">
          <text:p/>
        </draw:connector>
        <draw:connector draw:style-name="gr15" draw:text-style-name="P3" draw:layer="layout" draw:type="curve" svg:x1="122.041cm" svg:y1="67.981cm" svg:x2="129.376cm" svg:y2="70.324cm" draw:start-shape="id245" draw:start-glue-point="2" draw:end-shape="id216" draw:end-glue-point="0" svg:d="M122041 67981c0 1758 7335 587 7335 2343" svg:viewBox="0 0 7336 2344">
          <text:p/>
        </draw:connector>
        <draw:connector draw:style-name="gr6" draw:text-style-name="P3" draw:layer="layout" draw:type="curve" svg:x1="44.923cm" svg:y1="62.099cm" svg:x2="48.334cm" svg:y2="56.341cm" draw:start-shape="id246" draw:start-glue-point="0" draw:end-shape="id247" draw:end-glue-point="2" svg:d="M44923 62099c0-4317 3411-1438 3411-5758" svg:viewBox="0 0 3412 5759">
          <text:p/>
        </draw:connector>
        <draw:connector draw:style-name="gr6" draw:text-style-name="P3" draw:layer="layout" draw:type="curve" svg:x1="48.324cm" svg:y1="62.1cm" svg:x2="48.334cm" svg:y2="56.341cm" draw:start-shape="id248" draw:start-glue-point="0" draw:end-shape="id247" draw:end-glue-point="2" svg:d="M48324 62100c0-4318 10-1439 10-5759" svg:viewBox="0 0 11 5760">
          <text:p/>
        </draw:connector>
        <draw:custom-shape draw:style-name="gr8" draw:text-style-name="P7" xml:id="id249" draw:id="id249" draw:layer="layout" svg:width="3.048cm" svg:height="2.54cm" svg:x="72.103cm" svg:y="32.933cm">
          <text:p text:style-name="P4"><text:span text:style-name="T5">Azubah</text:span></text:p>
          <text:p text:style-name="P4"><text:span text:style-name="T4">1Ch 2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72.103cm" svg:y1="34.203cm" svg:x2="71.527cm" svg:y2="34.2cm" draw:start-shape="id249" draw:start-glue-point="3" draw:end-shape="id250" draw:end-glue-point="1" svg:d="M72103 34203c-430 0-143-3-576-3" svg:viewBox="0 0 577 4">
          <text:p/>
        </draw:connector>
        <draw:connector draw:style-name="gr6" draw:text-style-name="P3" draw:layer="layout" draw:type="curve" svg:x1="65.206cm" svg:y1="35.474cm" svg:x2="58.112cm" svg:y2="38.334cm" draw:start-shape="id251" draw:start-glue-point="2" draw:end-shape="id252" draw:end-glue-point="0" svg:d="M65206 35474c0 2146-7094 717-7094 2860" svg:viewBox="0 0 7095 2861">
          <text:p/>
        </draw:connector>
        <draw:connector draw:style-name="gr6" draw:text-style-name="P3" draw:layer="layout" draw:type="curve" svg:x1="65.206cm" svg:y1="35.474cm" svg:x2="61.713cm" svg:y2="38.335cm" draw:start-shape="id251" draw:start-glue-point="2" draw:end-shape="id253" draw:end-glue-point="0" svg:d="M65206 35474c0 2146-3493 716-3493 2861" svg:viewBox="0 0 3494 2862">
          <text:p/>
        </draw:connector>
        <draw:connector draw:style-name="gr6" draw:text-style-name="P3" draw:layer="layout" draw:type="curve" svg:x1="65.206cm" svg:y1="35.474cm" svg:x2="65.213cm" svg:y2="38.335cm" draw:start-shape="id251" draw:start-glue-point="2" draw:end-shape="id254" draw:end-glue-point="0" svg:d="M65206 35474c0 2146 7 716 7 2861" svg:viewBox="0 0 8 2862">
          <text:p/>
        </draw:connector>
        <draw:connector draw:style-name="gr9" draw:text-style-name="P3" draw:layer="layout" draw:type="curve" draw:line-skew="2.449cm" svg:x1="86.199cm" svg:y1="34.228cm" svg:x2="69.444cm" svg:y2="32.6cm" draw:start-shape="id255" draw:start-glue-point="3" draw:end-shape="id250" draw:end-glue-point="0" svg:d="M86199 34228c-7329 0-6107-1065-8464-1660s-8291-719-8291 32" svg:viewBox="0 0 16756 2150">
          <text:p/>
        </draw:connector>
        <draw:custom-shape draw:style-name="gr7" draw:text-style-name="P6" xml:id="id252" draw:id="id252" draw:layer="layout" svg:width="3.048cm" svg:height="2.54cm" svg:x="56.588cm" svg:y="38.334cm">
          <text:p text:style-name="P4"><text:span text:style-name="T5">Jesher</text:span></text:p>
          <text:p text:style-name="P4"><text:span text:style-name="T4">1Ch 2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53" draw:id="id253" draw:layer="layout" svg:width="3.048cm" svg:height="2.54cm" svg:x="60.189cm" svg:y="38.335cm">
          <text:p text:style-name="P4"><text:span text:style-name="T5">Shobab</text:span></text:p>
          <text:p text:style-name="P4"><text:span text:style-name="T4">1Ch 2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54" draw:id="id254" draw:layer="layout" svg:width="3.048cm" svg:height="2.54cm" svg:x="63.689cm" svg:y="38.335cm">
          <text:p text:style-name="P4"><text:span text:style-name="T5">Ardon</text:span></text:p>
          <text:p text:style-name="P4"><text:span text:style-name="T4">1Ch 2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77.76cm" svg:y1="38.336cm" svg:x2="73.627cm" svg:y2="35.473cm" draw:start-shape="id256" draw:start-glue-point="0" draw:end-shape="id249" draw:end-glue-point="2" svg:d="M77760 38336c0-2146-4133-715-4133-2863" svg:viewBox="0 0 4134 2864">
          <text:p/>
        </draw:connector>
        <draw:custom-shape draw:style-name="gr7" draw:text-style-name="P6" xml:id="id257" draw:id="id257" draw:layer="layout" svg:width="3.048cm" svg:height="2.54cm" svg:x="72.135cm" svg:y="38.335cm">
          <text:p text:style-name="P4"><text:span text:style-name="T7">Mesha</text:span></text:p>
          <text:p text:style-name="P4"><text:span text:style-name="T4">1Ch 2: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56" draw:id="id256" draw:layer="layout" svg:width="3.048cm" svg:height="2.54cm" svg:x="76.236cm" svg:y="38.336cm">
          <text:p text:style-name="P4"><text:span text:style-name="T5">Mareshah</text:span></text:p>
          <text:p text:style-name="P4"><text:span text:style-name="T4">1Ch 2: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73.659cm" svg:y1="38.335cm" svg:x2="73.627cm" svg:y2="35.473cm" draw:start-shape="id257" draw:start-glue-point="0" draw:end-shape="id249" draw:end-glue-point="2" svg:d="M73659 38335c0-2145-32-714-32-2862" svg:viewBox="0 0 33 2863">
          <text:p/>
        </draw:connector>
        <draw:custom-shape draw:style-name="gr8" draw:text-style-name="P7" xml:id="id251" draw:id="id251" draw:layer="layout" svg:width="3.048cm" svg:height="2.54cm" svg:x="63.682cm" svg:y="32.934cm">
          <text:p text:style-name="P4"><text:span text:style-name="T5">Jerioth</text:span></text:p>
          <text:p text:style-name="P4"><text:span text:style-name="T4">1Ch 2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66.73cm" svg:y1="34.204cm" svg:x2="67.361cm" svg:y2="34.2cm" draw:start-shape="id251" draw:start-glue-point="1" draw:end-shape="id250" draw:end-glue-point="3" svg:d="M66730 34204c474 0 159-4 631-4" svg:viewBox="0 0 632 5">
          <text:p/>
        </draw:connector>
        <draw:custom-shape draw:style-name="gr16" draw:text-style-name="P10" xml:id="id258" draw:id="id258" draw:layer="layout" svg:width="3.962cm" svg:height="4.318cm" svg:x="71.683cm" svg:y="41.906cm">
          <text:p text:style-name="P4"><text:span text:style-name="T3">Ziph</text:span><text:span text:style-name="T11"> 1</text:span></text:p>
          <text:p text:style-name="P4"><text:span text:style-name="T4">Jos 15:21,24</text:span></text:p>
          <text:p text:style-name="P9"><text:span text:style-name="T12">Ziph</text:span><text:span text:style-name="T13"> 2</text:span></text:p>
          <text:p text:style-name="P9"><text:span text:style-name="T4">Jos 15:48,55</text:span></text:p>
          <text:p text:style-name="P9"><text:span text:style-name="T14">Ziph</text:span><text:span text:style-name="T15"> 1 or 2</text:span></text:p>
          <text:p text:style-name="P9"><text:span text:style-name="T4">1Ch 2:42</text:span></text:p>
          <text:p text:style-name="P9"><text:span text:style-name="T4">2Ch 11:5,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7" draw:text-style-name="P3" draw:layer="layout" draw:type="curve" svg:x1="73.659cm" svg:y1="40.875cm" svg:x2="73.664cm" svg:y2="41.906cm" draw:start-shape="id257" draw:start-glue-point="2" draw:end-shape="id258" draw:end-glue-point="0" svg:d="M73659 40875c0 774 5 259 5 1031" svg:viewBox="0 0 6 1032">
          <text:p/>
        </draw:connector>
        <draw:custom-shape draw:style-name="gr18" draw:text-style-name="P5" xml:id="id208" draw:id="id208" draw:layer="layout" svg:width="3.251cm" svg:height="2.591cm" svg:x="76.134cm" svg:y="43.586cm">
          <text:p text:style-name="P4"><text:span text:style-name="T5">Hebron</text:span></text:p>
          <text:p text:style-name="P4"><text:span text:style-name="T4">1Ch 2:42,4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77.76cm" svg:y1="40.876cm" svg:x2="77.759cm" svg:y2="43.586cm" draw:start-shape="id256" draw:start-glue-point="2" draw:end-shape="id208" draw:end-glue-point="0" svg:d="M77760 40876c0 2032-1 678-1 2710" svg:viewBox="0 0 2 2711">
          <text:p/>
        </draw:connector>
        <draw:custom-shape draw:style-name="gr7" draw:text-style-name="P6" xml:id="id209" draw:id="id209" draw:layer="layout" svg:width="3.048cm" svg:height="2.54cm" svg:x="70.912cm" svg:y="48.136cm">
          <text:p text:style-name="P4"><text:span text:style-name="T5">Korah</text:span></text:p>
          <text:p text:style-name="P4"><text:span text:style-name="T4">1Ch 2:4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10" draw:id="id210" draw:layer="layout" svg:width="3.048cm" svg:height="2.54cm" svg:x="74.412cm" svg:y="48.136cm">
          <text:p text:style-name="P4"><text:span text:style-name="T5">Tappuah</text:span></text:p>
          <text:p text:style-name="P4"><text:span text:style-name="T4">1Ch 2:4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11" draw:id="id211" draw:layer="layout" svg:width="3.048cm" svg:height="2.54cm" svg:x="78.012cm" svg:y="48.136cm">
          <text:p text:style-name="P4"><text:span text:style-name="T3">Rekem</text:span></text:p>
          <text:p text:style-name="P4"><text:span text:style-name="T4">1Ch 2:4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12" draw:id="id212" draw:layer="layout" svg:width="3.048cm" svg:height="2.54cm" svg:x="81.713cm" svg:y="48.137cm">
          <text:p text:style-name="P4"><text:span text:style-name="T5">Shema</text:span></text:p>
          <text:p text:style-name="P4"><text:span text:style-name="T4">1Ch 2:4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60" draw:id="id260" draw:layer="layout" svg:width="3.048cm" svg:height="2.54cm" svg:x="81.714cm" svg:y="51.438cm">
          <text:p text:style-name="P4"><text:span text:style-name="T5">Raham</text:span></text:p>
          <text:p text:style-name="P4"><text:span text:style-name="T4">1Ch 2:4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59" draw:id="id259" draw:layer="layout" svg:width="3.048cm" svg:height="2.54cm" svg:x="78.013cm" svg:y="51.437cm">
          <text:p text:style-name="P4"><text:span text:style-name="T3">Shammai</text:span></text:p>
          <text:p text:style-name="P4"><text:span text:style-name="T4">1Ch 2:4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79.536cm" svg:y1="50.676cm" svg:x2="79.537cm" svg:y2="51.437cm" draw:start-shape="id211" draw:start-glue-point="2" draw:end-shape="id259" draw:end-glue-point="0" svg:d="M79536 50676c0 571 1 191 1 761" svg:viewBox="0 0 2 762">
          <text:p/>
        </draw:connector>
        <draw:connector draw:style-name="gr6" draw:text-style-name="P3" draw:layer="layout" draw:type="curve" svg:x1="83.237cm" svg:y1="50.677cm" svg:x2="83.238cm" svg:y2="51.438cm" draw:start-shape="id212" draw:start-glue-point="2" draw:end-shape="id260" draw:end-glue-point="0" svg:d="M83237 50677c0 571 1 191 1 761" svg:viewBox="0 0 2 762">
          <text:p/>
        </draw:connector>
        <draw:custom-shape draw:style-name="gr19" draw:text-style-name="P5" xml:id="id261" draw:id="id261" draw:layer="layout" svg:width="3.048cm" svg:height="2.54cm" svg:x="81.716cm" svg:y="54.732cm">
          <text:p text:style-name="P4"><text:span text:style-name="T5">Jorkoam</text:span></text:p>
          <text:p text:style-name="P4"><text:span text:style-name="T4">1Ch 2:4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7" draw:text-style-name="P3" draw:layer="layout" draw:type="curve" svg:x1="83.24cm" svg:y1="54.732cm" svg:x2="83.238cm" svg:y2="53.978cm" draw:start-shape="id261" draw:start-glue-point="0" draw:end-shape="id260" draw:end-glue-point="2" svg:d="M83240 54732c0-564-2-187-2-754" svg:viewBox="0 0 3 755">
          <text:p/>
        </draw:connector>
        <draw:custom-shape draw:style-name="gr7" draw:text-style-name="P6" xml:id="id262" draw:id="id262" draw:layer="layout" svg:width="3.048cm" svg:height="2.54cm" svg:x="78.014cm" svg:y="54.738cm">
          <text:p text:style-name="P4"><text:span text:style-name="T3">Maon</text:span></text:p>
          <text:p text:style-name="P4"><text:span text:style-name="T4">1Ch 2:4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79.538cm" svg:y1="54.738cm" svg:x2="79.537cm" svg:y2="53.977cm" draw:start-shape="id262" draw:start-glue-point="0" draw:end-shape="id259" draw:end-glue-point="2" svg:d="M79538 54738c0-570-1-190-1-761" svg:viewBox="0 0 2 762">
          <text:p/>
        </draw:connector>
        <draw:custom-shape draw:style-name="gr20" draw:text-style-name="P11" xml:id="id263" draw:id="id263" draw:layer="layout" svg:width="3.353cm" svg:height="3.505cm" svg:x="77.862cm" svg:y="58.086cm">
          <text:p text:style-name="P4"><text:span text:style-name="T5">Beth-zur</text:span></text:p>
          <text:p text:style-name="P4"><text:span text:style-name="T4">1Ch 2:45</text:span></text:p>
          <text:p text:style-name="P9"><text:span text:style-name="T9">Bethzur</text:span></text:p>
          <text:p text:style-name="P9"><text:span text:style-name="T4">Jos 15:20,48,58</text:span></text:p>
          <text:p text:style-name="P9"><text:span text:style-name="T4">2Ch 11:5,7</text:span></text:p>
          <text:p text:style-name="P9"><text:span text:style-name="T4">Neh 3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1" draw:text-style-name="P3" draw:layer="layout" draw:type="curve" svg:x1="79.538cm" svg:y1="57.278cm" svg:x2="79.538cm" svg:y2="58.086cm" draw:start-shape="id262" draw:start-glue-point="2" draw:end-shape="id263" draw:end-glue-point="0" svg:d="M79538 57278v808" svg:viewBox="0 0 1 809">
          <text:p/>
        </draw:connector>
        <draw:connector draw:style-name="gr9" draw:text-style-name="P3" draw:layer="layout" draw:type="curve" draw:line-skew="11.558cm" svg:x1="97.396cm" svg:y1="34.205cm" svg:x2="69.444cm" svg:y2="32.6cm" draw:start-shape="id264" draw:start-glue-point="3" draw:end-shape="id250" draw:end-glue-point="0" svg:d="M97396 34205c-2064 0-1720-1053-8192-1642s-19760-714-19760 37" svg:viewBox="0 0 27953 2128">
          <text:p/>
        </draw:connector>
        <draw:custom-shape draw:style-name="gr8" draw:text-style-name="P7" xml:id="id264" draw:id="id264" draw:layer="layout" svg:width="3.048cm" svg:height="2.54cm" svg:x="97.396cm" svg:y="32.935cm">
          <text:p text:style-name="P4"><text:span text:style-name="T5">Ephah</text:span></text:p>
          <text:p text:style-name="P4"><text:span text:style-name="T8">concubine</text:span></text:p>
          <text:p text:style-name="P4"><text:span text:style-name="T4">1Ch 2:4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66" draw:id="id266" draw:layer="layout" svg:width="3.048cm" svg:height="2.54cm" svg:x="97.412cm" svg:y="38.136cm">
          <text:p text:style-name="P4"><text:span text:style-name="T5">Haran</text:span></text:p>
          <text:p text:style-name="P4"><text:span text:style-name="T4">1Ch 2:4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65" draw:id="id265" draw:layer="layout" svg:width="3.048cm" svg:height="2.54cm" svg:x="100.912cm" svg:y="38.136cm">
          <text:p text:style-name="P4"><text:span text:style-name="T5">Moza</text:span></text:p>
          <text:p text:style-name="P4"><text:span text:style-name="T4">1Ch 2:4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98.92cm" svg:y1="35.475cm" svg:x2="102.436cm" svg:y2="38.136cm" draw:start-shape="id264" draw:start-glue-point="2" draw:end-shape="id265" draw:end-glue-point="0" svg:d="M98920 35475c0 1996 3516 666 3516 2661" svg:viewBox="0 0 3517 2662">
          <text:p/>
        </draw:connector>
        <draw:connector draw:style-name="gr6" draw:text-style-name="P3" draw:layer="layout" draw:type="curve" svg:x1="98.936cm" svg:y1="38.136cm" svg:x2="98.92cm" svg:y2="35.475cm" draw:start-shape="id266" draw:start-glue-point="0" draw:end-shape="id264" draw:end-glue-point="2" svg:d="M98936 38136c0-1995-16-665-16-2661" svg:viewBox="0 0 17 2662">
          <text:p/>
        </draw:connector>
        <draw:custom-shape draw:style-name="gr7" draw:text-style-name="P6" xml:id="id267" draw:id="id267" draw:layer="layout" svg:width="3.048cm" svg:height="2.54cm" svg:x="104.413cm" svg:y="38.137cm">
          <text:p text:style-name="P4"><text:span text:style-name="T5">Gazez</text:span></text:p>
          <text:p text:style-name="P4"><text:span text:style-name="T4">1Ch 2:4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98.92cm" svg:y1="35.475cm" svg:x2="105.937cm" svg:y2="38.137cm" draw:start-shape="id264" draw:start-glue-point="2" draw:end-shape="id267" draw:end-glue-point="0" svg:d="M98920 35475c0 1998 7017 667 7017 2662" svg:viewBox="0 0 7018 2663">
          <text:p/>
        </draw:connector>
        <draw:custom-shape draw:style-name="gr7" draw:text-style-name="P6" xml:id="id268" draw:id="id268" draw:layer="layout" svg:width="3.048cm" svg:height="2.54cm" svg:x="97.414cm" svg:y="41.673cm">
          <text:p text:style-name="P4"><text:span text:style-name="T5">Gazez</text:span></text:p>
          <text:p text:style-name="P4"><text:span text:style-name="T4">1Ch 2:4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98.936cm" svg:y1="40.676cm" svg:x2="98.938cm" svg:y2="41.673cm" draw:start-shape="id266" draw:start-glue-point="2" draw:end-shape="id268" draw:end-glue-point="0" svg:d="M98936 40676c0 748 2 250 2 997" svg:viewBox="0 0 3 998">
          <text:p/>
        </draw:connector>
        <draw:connector draw:style-name="gr9" draw:text-style-name="P3" draw:layer="layout" draw:type="curve" draw:line-skew="17.203cm" svg:x1="108.505cm" svg:y1="34.287cm" svg:x2="69.444cm" svg:y2="32.6cm" draw:start-shape="id269" draw:start-glue-point="3" draw:end-shape="id250" draw:end-glue-point="0" svg:d="M108505 34287c-1927 0-1605-1094-10889-1704s-28172-734-28172 17" svg:viewBox="0 0 39062 2208">
          <text:p/>
        </draw:connector>
        <draw:custom-shape draw:style-name="gr58" draw:text-style-name="P12" xml:id="id250" draw:id="id250" draw:layer="layout" svg:width="4.166cm" svg:height="3.2cm" svg:x="67.361cm" svg:y="32.6cm">
          <text:p text:style-name="P9"><text:span text:style-name="T9">Chelubai</text:span></text:p>
          <text:p text:style-name="P9"><text:span text:style-name="T4">1Ch 2:9</text:span></text:p>
          <text:p text:style-name="P9"><text:span text:style-name="T9">Caleb</text:span></text:p>
          <text:p text:style-name="P9"><text:span text:style-name="T4">1Ch 2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70" draw:id="id270" draw:layer="layout" svg:width="3.048cm" svg:height="2.54cm" svg:x="61.879cm" svg:y="62.137cm">
          <text:p text:style-name="P4"><text:span text:style-name="T5">Nabal</text:span></text:p>
          <text:p text:style-name="P4"><text:span text:style-name="T4">1Sa 25:2,3, 30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271" draw:id="id271" draw:layer="layout" svg:width="3.048cm" svg:height="2.54cm" svg:x="58.18cm" svg:y="62.138cm">
          <text:p text:style-name="P4"><text:span text:style-name="T5">Abigail</text:span></text:p>
          <text:p text:style-name="P4"><text:span text:style-name="T4">1Sa 25:3, 27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" draw:text-style-name="P3" draw:layer="layout" draw:type="curve" svg:x1="61.879cm" svg:y1="63.407cm" svg:x2="61.228cm" svg:y2="63.408cm" draw:start-shape="id270" draw:start-glue-point="3" draw:end-shape="id271" draw:end-glue-point="1" svg:d="M61879 63407c-487 0-162 1-651 1" svg:viewBox="0 0 652 2">
          <text:p/>
        </draw:connector>
        <draw:connector draw:style-name="gr2" draw:text-style-name="P3" draw:layer="layout" draw:type="curve" draw:line-skew="3.278cm" svg:x1="63.403cm" svg:y1="62.137cm" svg:x2="69.444cm" svg:y2="35.8cm" draw:start-shape="id270" draw:start-glue-point="0" draw:end-shape="id250" draw:end-glue-point="2" svg:d="M63403 62137c0-14835 6041-1667 6041-26337" svg:viewBox="0 0 6042 26338">
          <text:p/>
        </draw:connector>
        <draw:connector draw:style-name="gr23" draw:text-style-name="P3" draw:layer="layout" draw:type="curve" svg:x1="48.314cm" svg:y1="27.096cm" svg:x2="48.331cm" svg:y2="28.098cm" draw:start-shape="id244" draw:start-glue-point="2" draw:end-shape="id272" draw:end-glue-point="0" svg:d="M48314 27096c0 751 17 251 17 1002" svg:viewBox="0 0 18 1003">
          <text:p/>
        </draw:connector>
        <draw:connector draw:style-name="gr2" draw:text-style-name="P3" draw:layer="layout" draw:type="curve" svg:x1="48.314cm" svg:y1="27.096cm" svg:x2="56.514cm" svg:y2="28.104cm" draw:start-shape="id244" draw:start-glue-point="2" draw:end-shape="id273" draw:end-glue-point="0" svg:d="M48314 27096c0 756 8200 252 8200 1008" svg:viewBox="0 0 8201 1009">
          <text:p/>
        </draw:connector>
        <draw:connector draw:style-name="gr2" draw:text-style-name="P3" draw:layer="layout" draw:type="curve" svg:x1="44.155cm" svg:y1="28.097cm" svg:x2="44.153cm" svg:y2="26.635cm" draw:start-shape="id274" draw:start-glue-point="0" draw:end-shape="id217" draw:end-glue-point="2" svg:d="M44155 28097c0-1095-2-364-2-1462" svg:viewBox="0 0 3 1463">
          <text:p/>
        </draw:connector>
        <draw:connector draw:style-name="gr6" draw:text-style-name="P3" draw:layer="layout" draw:type="curve" svg:x1="48.333cm" svg:y1="43.3cm" svg:x2="48.332cm" svg:y2="42.539cm" draw:start-shape="id275" draw:start-glue-point="0" draw:end-shape="id276" draw:end-glue-point="2" svg:d="M48333 43300c0-570-1-190-1-761" svg:viewBox="0 0 2 762">
          <text:p/>
        </draw:connector>
        <draw:connector draw:style-name="gr23" draw:text-style-name="P3" draw:layer="layout" draw:type="curve" svg:x1="48.331cm" svg:y1="30.638cm" svg:x2="48.331cm" svg:y2="32.498cm" draw:start-shape="id272" draw:start-glue-point="2" draw:end-shape="id277" draw:end-glue-point="0" svg:d="M48331 30638v1860" svg:viewBox="0 0 1 1861">
          <text:p/>
        </draw:connector>
        <draw:connector draw:style-name="gr6" draw:text-style-name="P3" draw:layer="layout" draw:type="curve" svg:x1="48.333cm" svg:y1="46.9cm" svg:x2="44.434cm" svg:y2="45.841cm" draw:start-shape="id278" draw:start-glue-point="0" draw:end-shape="id279" draw:end-glue-point="2" svg:d="M48333 46900c0-793-3899-264-3899-1059" svg:viewBox="0 0 3900 1060">
          <text:p/>
        </draw:connector>
        <draw:connector draw:style-name="gr6" draw:text-style-name="P3" draw:layer="layout" draw:type="curve" svg:x1="48.333cm" svg:y1="50.5cm" svg:x2="44.435cm" svg:y2="49.442cm" draw:start-shape="id280" draw:start-glue-point="0" draw:end-shape="id281" draw:end-glue-point="2" svg:d="M48333 50500c0-792-3898-263-3898-1058" svg:viewBox="0 0 3899 1059">
          <text:p/>
        </draw:connector>
        <draw:connector draw:style-name="gr6" draw:text-style-name="P3" draw:layer="layout" draw:type="curve" svg:x1="48.334cm" svg:y1="53.801cm" svg:x2="48.333cm" svg:y2="53.04cm" draw:start-shape="id247" draw:start-glue-point="0" draw:end-shape="id280" draw:end-glue-point="2" svg:d="M48334 53801c0-570-1-190-1-761" svg:viewBox="0 0 2 762">
          <text:p/>
        </draw:connector>
        <draw:connector draw:style-name="gr6" draw:text-style-name="P3" draw:layer="layout" draw:type="curve" svg:x1="48.334cm" svg:y1="56.341cm" svg:x2="21.024cm" svg:y2="62.1cm" draw:start-shape="id247" draw:start-glue-point="2" draw:end-shape="id282" draw:end-glue-point="0" svg:d="M48334 56341c0 4320-27310 1441-27310 5759" svg:viewBox="0 0 27311 5760">
          <text:p/>
        </draw:connector>
        <draw:connector draw:style-name="gr6" draw:text-style-name="P3" draw:layer="layout" draw:type="curve" svg:x1="48.332cm" svg:y1="39.999cm" svg:x2="48.335cm" svg:y2="39.139cm" draw:start-shape="id276" draw:start-glue-point="0" draw:end-shape="id283" draw:end-glue-point="2" svg:d="M48332 39999c0-643 3-214 3-860" svg:viewBox="0 0 4 861">
          <text:p/>
        </draw:connector>
        <draw:connector draw:style-name="gr23" draw:text-style-name="P3" draw:layer="layout" draw:type="curve" svg:x1="48.331cm" svg:y1="30.638cm" svg:x2="40.032cm" svg:y2="32.499cm" draw:start-shape="id272" draw:start-glue-point="2" draw:end-shape="id284" draw:end-glue-point="0" svg:d="M48331 30638c0 1396-8299 466-8299 1861" svg:viewBox="0 0 8300 1862">
          <text:p/>
        </draw:connector>
        <draw:connector draw:style-name="gr6" draw:text-style-name="P3" draw:layer="layout" draw:type="curve" svg:x1="48.334cm" svg:y1="56.341cm" svg:x2="24.523cm" svg:y2="62.099cm" draw:start-shape="id247" draw:start-glue-point="2" draw:end-shape="id285" draw:end-glue-point="0" svg:d="M48334 56341c0 4318-23811 1440-23811 5758" svg:viewBox="0 0 23812 5759">
          <text:p/>
        </draw:connector>
        <draw:connector draw:style-name="gr6" draw:text-style-name="P3" draw:layer="layout" draw:type="curve" svg:x1="48.334cm" svg:y1="56.341cm" svg:x2="31.322cm" svg:y2="62.098cm" draw:start-shape="id247" draw:start-glue-point="2" draw:end-shape="id286" draw:end-glue-point="0" svg:d="M48334 56341c0 4318-17012 1440-17012 5757" svg:viewBox="0 0 17013 5758">
          <text:p/>
        </draw:connector>
        <draw:connector draw:style-name="gr6" draw:text-style-name="P3" draw:layer="layout" draw:type="curve" svg:x1="34.723cm" svg:y1="62.099cm" svg:x2="48.334cm" svg:y2="56.341cm" draw:start-shape="id287" draw:start-glue-point="0" draw:end-shape="id247" draw:end-glue-point="2" svg:d="M34723 62099c0-4317 13611-1438 13611-5758" svg:viewBox="0 0 13612 5759">
          <text:p/>
        </draw:connector>
        <draw:connector draw:style-name="gr2" draw:text-style-name="P3" draw:layer="layout" draw:type="curve" svg:x1="41.525cm" svg:y1="62.101cm" svg:x2="48.334cm" svg:y2="56.341cm" draw:start-shape="id288" draw:start-glue-point="0" draw:end-shape="id247" draw:end-glue-point="2" svg:d="M41525 62101c0-4318 6809-1439 6809-5760" svg:viewBox="0 0 6810 5761">
          <text:p/>
        </draw:connector>
        <draw:connector draw:style-name="gr6" draw:text-style-name="P3" draw:layer="layout" draw:type="curve" svg:x1="38.124cm" svg:y1="62.1cm" svg:x2="48.334cm" svg:y2="56.341cm" draw:start-shape="id289" draw:start-glue-point="0" draw:end-shape="id247" draw:end-glue-point="2" svg:d="M38124 62100c0-4318 10210-1439 10210-5759" svg:viewBox="0 0 10211 5760">
          <text:p/>
        </draw:connector>
        <draw:connector draw:style-name="gr6" draw:text-style-name="P3" draw:layer="layout" draw:type="curve" svg:x1="48.331cm" svg:y1="35.038cm" svg:x2="48.335cm" svg:y2="36.599cm" draw:start-shape="id277" draw:start-glue-point="2" draw:end-shape="id283" draw:end-glue-point="0" svg:d="M48331 35038c0 1171 4 391 4 1561" svg:viewBox="0 0 5 1562">
          <text:p/>
        </draw:connector>
        <draw:connector draw:style-name="gr6" draw:text-style-name="P3" draw:layer="layout" draw:type="curve" svg:x1="17.525cm" svg:y1="62.101cm" svg:x2="48.334cm" svg:y2="56.341cm" draw:start-shape="id290" draw:start-glue-point="0" draw:end-shape="id247" draw:end-glue-point="2" svg:d="M17525 62101c0-4318 30809-1439 30809-5760" svg:viewBox="0 0 30810 5761">
          <text:p/>
        </draw:connector>
        <draw:connector draw:style-name="gr6" draw:text-style-name="P3" draw:layer="layout" draw:type="curve" svg:x1="27.924cm" svg:y1="62.1cm" svg:x2="48.334cm" svg:y2="56.341cm" draw:start-shape="id291" draw:start-glue-point="0" draw:end-shape="id247" draw:end-glue-point="2" svg:d="M27924 62100c0-4318 20410-1439 20410-5759" svg:viewBox="0 0 20411 5760">
          <text:p/>
        </draw:connector>
        <draw:connector draw:style-name="gr6" draw:text-style-name="P3" draw:layer="layout" draw:type="curve" svg:x1="44.154cm" svg:y1="36.596cm" svg:x2="44.153cm" svg:y2="35.035cm" draw:start-shape="id292" draw:start-glue-point="0" draw:end-shape="id293" draw:end-glue-point="2" svg:d="M44154 36596c0-1170-1-390-1-1561" svg:viewBox="0 0 2 1562">
          <text:p/>
        </draw:connector>
        <draw:connector draw:style-name="gr6" draw:text-style-name="P3" draw:layer="layout" draw:type="curve" svg:x1="44.153cm" svg:y1="32.495cm" svg:x2="44.155cm" svg:y2="30.637cm" draw:start-shape="id293" draw:start-glue-point="0" draw:end-shape="id274" draw:end-glue-point="2" svg:d="M44153 32495c0-1392 2-463 2-1858" svg:viewBox="0 0 3 1859">
          <text:p/>
        </draw:connector>
        <draw:connector draw:style-name="gr9" draw:text-style-name="P3" draw:layer="layout" draw:type="curve" svg:x1="46.807cm" svg:y1="29.368cm" svg:x2="45.679cm" svg:y2="29.367cm" draw:start-shape="id272" draw:start-glue-point="3" draw:end-shape="id274" draw:end-glue-point="1" svg:d="M46807 29368c-844 0-281-1-1128-1" svg:viewBox="0 0 1129 2">
          <text:p/>
        </draw:connector>
        <draw:connector draw:style-name="gr24" draw:text-style-name="P3" draw:layer="layout" draw:type="curve" svg:x1="40.652cm" svg:y1="28.094cm" svg:x2="44.153cm" svg:y2="26.635cm" draw:start-shape="id294" draw:start-glue-point="0" draw:end-shape="id217" draw:end-glue-point="2" svg:d="M40652 28094c0-1093 3501-364 3501-1459" svg:viewBox="0 0 3502 1460">
          <text:p/>
        </draw:connector>
        <draw:custom-shape draw:style-name="gr25" draw:text-style-name="P6" xml:id="id244" draw:id="id244" draw:layer="layout" svg:width="3.048cm" svg:height="3.099cm" svg:x="46.79cm" svg:y="23.997cm">
          <text:p text:style-name="P4"><text:span text:style-name="T5">Pharez</text:span></text:p>
          <text:p text:style-name="P4"><text:span text:style-name="T4">1Ch 2:4</text:span></text:p>
          <text:p text:style-name="P4"><text:span text:style-name="T4">Rth 4:18</text:span></text:p>
          <text:p text:style-name="P4"><text:span text:style-name="T14">Perez</text:span></text:p>
          <text:p text:style-name="P4"><text:span text:style-name="T4">1Ch 27:3</text:span></text:p>
          <text:p text:style-name="P4"><text:span text:style-name="T4">Neh 11:4,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73" draw:id="id273" draw:layer="layout" svg:width="3.048cm" svg:height="2.54cm" svg:x="54.99cm" svg:y="28.104cm">
          <text:p text:style-name="P4"><text:span text:style-name="T5">Hamul</text:span></text:p>
          <text:p text:style-name="P4"><text:span text:style-name="T4">Gen 46:12</text:span></text:p>
          <text:p text:style-name="P4"><text:span text:style-name="T4">Num 26:21</text:span></text:p>
          <text:p text:style-name="P4"><text:span text:style-name="T4">1Ch 2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72" draw:id="id272" draw:layer="layout" svg:width="3.048cm" svg:height="2.54cm" svg:x="46.807cm" svg:y="28.098cm">
          <text:p text:style-name="P4"><text:span text:style-name="T5">Hezron</text:span></text:p>
          <text:p text:style-name="P4"><text:span text:style-name="T4">1Ch 2:5</text:span></text:p>
          <text:p text:style-name="P4"><text:span text:style-name="T14">Esrom</text:span></text:p>
          <text:p text:style-name="P4"><text:span text:style-name="T4">Mat 1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77" draw:id="id277" draw:layer="layout" svg:width="3.048cm" svg:height="2.54cm" svg:x="46.807cm" svg:y="32.498cm">
          <text:p text:style-name="P4"><text:span text:style-name="T5">Ram</text:span></text:p>
          <text:p text:style-name="P4"><text:span text:style-name="T4">1Ch 2:9</text:span></text:p>
          <text:p text:style-name="P4"><text:span text:style-name="T14">Aram</text:span></text:p>
          <text:p text:style-name="P4"><text:span text:style-name="T4">Mat 1:3,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283" draw:id="id283" draw:layer="layout" svg:width="3.302cm" svg:height="2.54cm" svg:x="46.684cm" svg:y="36.599cm">
          <text:p text:style-name="P4"><text:span text:style-name="T5">Amminadab</text:span></text:p>
          <text:p text:style-name="P4"><text:span text:style-name="T4">1Ch 2:10</text:span></text:p>
          <text:p text:style-name="P4"><text:span text:style-name="T14">Aminadab</text:span></text:p>
          <text:p text:style-name="P4"><text:span text:style-name="T4">Mat 1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76" draw:id="id276" draw:layer="layout" svg:width="3.048cm" svg:height="2.54cm" svg:x="46.808cm" svg:y="39.999cm">
          <text:p text:style-name="P4"><text:span text:style-name="T5">Nahshon</text:span></text:p>
          <text:p text:style-name="P4"><text:span text:style-name="T4">1Ch 2:10</text:span></text:p>
          <text:p text:style-name="P4"><text:span text:style-name="T14">Naasson</text:span></text:p>
          <text:p text:style-name="P4"><text:span text:style-name="T4">Mat 1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75" draw:id="id275" draw:layer="layout" svg:width="3.048cm" svg:height="2.54cm" svg:x="46.809cm" svg:y="43.3cm">
          <text:p text:style-name="P4"><text:span text:style-name="T5">Salma</text:span></text:p>
          <text:p text:style-name="P4"><text:span text:style-name="T4">1Ch 2:11</text:span></text:p>
          <text:p text:style-name="P4"><text:span text:style-name="T14">Salmon</text:span></text:p>
          <text:p text:style-name="P4"><text:span text:style-name="T4">Rth 4:20,21</text:span></text:p>
          <text:p text:style-name="P4"><text:span text:style-name="T4">Mat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78" draw:id="id278" draw:layer="layout" svg:width="3.048cm" svg:height="2.54cm" svg:x="46.809cm" svg:y="46.9cm">
          <text:p text:style-name="P4"><text:span text:style-name="T5">Boaz</text:span></text:p>
          <text:p text:style-name="P4"><text:span text:style-name="T4">1Ch 2:11</text:span></text:p>
          <text:p text:style-name="P4"><text:span text:style-name="T14">Booz</text:span></text:p>
          <text:p text:style-name="P4"><text:span text:style-name="T4">Luk 3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80" draw:id="id280" draw:layer="layout" svg:width="3.048cm" svg:height="2.54cm" svg:x="46.809cm" svg:y="50.5cm">
          <text:p text:style-name="P4"><text:span text:style-name="T5">Obed</text:span></text:p>
          <text:p text:style-name="P4"><text:span text:style-name="T4">1Ch 2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47" draw:id="id247" draw:layer="layout" svg:width="3.048cm" svg:height="2.54cm" svg:x="46.81cm" svg:y="53.801cm">
          <text:p text:style-name="P4"><text:span text:style-name="T5">Jesse</text:span></text:p>
          <text:p text:style-name="P4"><text:span text:style-name="T4">1Ch 2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86" draw:id="id286" draw:layer="layout" svg:width="3.048cm" svg:height="2.54cm" svg:x="29.798cm" svg:y="62.098cm">
          <text:p text:style-name="P4"><text:span text:style-name="T5">Raddai</text:span></text:p>
          <text:p text:style-name="P4"><text:span text:style-name="T4">1Ch 2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87" draw:id="id287" draw:layer="layout" svg:width="3.048cm" svg:height="2.54cm" svg:x="33.199cm" svg:y="62.099cm">
          <text:p text:style-name="P4"><text:span text:style-name="T5">Ozem</text:span></text:p>
          <text:p text:style-name="P4"><text:span text:style-name="T4">1Ch 2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6" xml:id="id285" draw:id="id285" draw:layer="layout" svg:width="3.048cm" svg:height="4.131cm" svg:x="22.999cm" svg:y="62.099cm">
          <text:p text:style-name="P4"><text:span text:style-name="T5">Shimma</text:span></text:p>
          <text:p text:style-name="P4"><text:span text:style-name="T4">1Ch 2:13</text:span></text:p>
          <text:p text:style-name="P4"><text:span text:style-name="T14">Shammah</text:span></text:p>
          <text:p text:style-name="P4"><text:span text:style-name="T4">1Sa 16:9, 17:13</text:span></text:p>
          <text:p text:style-name="P4"><text:span text:style-name="T14">Shimea</text:span></text:p>
          <text:p text:style-name="P4"><text:span text:style-name="T4">1Ch 20:7</text:span></text:p>
          <text:p text:style-name="P9"><text:span text:style-name="T14">Shimeah</text:span></text:p>
          <text:p text:style-name="P9"><text:span text:style-name="T4">2Sa 13:3,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91" draw:id="id291" draw:layer="layout" svg:width="3.048cm" svg:height="2.54cm" svg:x="26.4cm" svg:y="62.1cm">
          <text:p text:style-name="P4"><text:span text:style-name="T5">Nethaneel</text:span></text:p>
          <text:p text:style-name="P4"><text:span text:style-name="T4">1Ch 2: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246" draw:id="id246" draw:layer="layout" svg:width="3.048cm" svg:height="2.54cm" svg:x="43.399cm" svg:y="62.099cm">
          <text:p text:style-name="P4"><text:span text:style-name="T5">Zeruiah</text:span></text:p>
          <text:p text:style-name="P4"><text:span text:style-name="T4">1Ch 2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248" draw:id="id248" draw:layer="layout" svg:width="3.048cm" svg:height="2.54cm" svg:x="46.8cm" svg:y="62.1cm">
          <text:p text:style-name="P4"><text:span text:style-name="T5">Abigail</text:span></text:p>
          <text:p text:style-name="P4"><text:span text:style-name="T4">1Ch 2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89" draw:id="id289" draw:layer="layout" svg:width="3.048cm" svg:height="2.54cm" svg:x="36.6cm" svg:y="62.1cm">
          <text:p text:style-name="P4"><text:span text:style-name="T5">David</text:span></text:p>
          <text:p text:style-name="P4"><text:span text:style-name="T4">1Ch 2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88" draw:id="id288" draw:layer="layout" svg:width="3.048cm" svg:height="2.54cm" svg:x="40.001cm" svg:y="62.101cm">
          <text:p text:style-name="P4"><text:span text:style-name="T9">Elihu</text:span></text:p>
          <text:p text:style-name="P4"><text:span text:style-name="T4">1Sa 16:10,11, 17:12</text:span></text:p>
          <text:p text:style-name="P4"><text:span text:style-name="T4">1Ch 27: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82" draw:id="id282" draw:layer="layout" svg:width="3.048cm" svg:height="2.54cm" svg:x="19.5cm" svg:y="62.1cm">
          <text:p text:style-name="P4"><text:span text:style-name="T5">Abinadab</text:span></text:p>
          <text:p text:style-name="P4"><text:span text:style-name="T4">1Ch 2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90" draw:id="id290" draw:layer="layout" svg:width="3.048cm" svg:height="2.54cm" svg:x="16.001cm" svg:y="62.101cm">
          <text:p text:style-name="P4"><text:span text:style-name="T7">Eliab</text:span></text:p>
          <text:p text:style-name="P4"><text:span text:style-name="T4">1Ch 2:13</text:span></text:p>
          <text:p text:style-name="P4"><text:span text:style-name="T4">1Sa 17: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44.923cm" svg:y1="64.639cm" svg:x2="51.726cm" svg:y2="66.102cm" draw:start-shape="id246" draw:start-glue-point="2" draw:end-shape="id295" draw:end-glue-point="0" svg:d="M44923 64639c0 1098 6803 367 6803 1463" svg:viewBox="0 0 6804 1464">
          <text:p/>
        </draw:connector>
        <draw:connector draw:style-name="gr6" draw:text-style-name="P3" draw:layer="layout" draw:type="curve" svg:x1="44.923cm" svg:y1="64.639cm" svg:x2="44.924cm" svg:y2="66.1cm" draw:start-shape="id246" draw:start-glue-point="2" draw:end-shape="id296" draw:end-glue-point="0" svg:d="M44923 64639c0 1096 1 366 1 1461" svg:viewBox="0 0 2 1462">
          <text:p/>
        </draw:connector>
        <draw:connector draw:style-name="gr9" draw:text-style-name="P3" draw:layer="layout" draw:type="curve" svg:x1="50.702cm" svg:y1="63.36cm" svg:x2="49.848cm" svg:y2="63.37cm" draw:start-shape="id297" draw:start-glue-point="3" draw:end-shape="id248" draw:end-glue-point="1" svg:d="M50702 63360c-639 0-212 10-854 10" svg:viewBox="0 0 855 11">
          <text:p/>
        </draw:connector>
        <draw:connector draw:style-name="gr6" draw:text-style-name="P3" draw:layer="layout" draw:type="curve" svg:x1="48.324cm" svg:y1="64.64cm" svg:x2="55.127cm" svg:y2="66.103cm" draw:start-shape="id248" draw:start-glue-point="2" draw:end-shape="id298" draw:end-glue-point="0" svg:d="M48324 64640c0 1098 6803 367 6803 1463" svg:viewBox="0 0 6804 1464">
          <text:p/>
        </draw:connector>
        <draw:connector draw:style-name="gr6" draw:text-style-name="P3" draw:layer="layout" draw:type="curve" svg:x1="44.923cm" svg:y1="64.639cm" svg:x2="48.325cm" svg:y2="66.101cm" draw:start-shape="id246" draw:start-glue-point="2" draw:end-shape="id299" draw:end-glue-point="0" svg:d="M44923 64639c0 1098 3402 367 3402 1462" svg:viewBox="0 0 3403 1463">
          <text:p/>
        </draw:connector>
        <draw:custom-shape draw:style-name="gr7" draw:text-style-name="P6" xml:id="id296" draw:id="id296" draw:layer="layout" svg:width="3.048cm" svg:height="2.54cm" svg:x="43.4cm" svg:y="66.1cm">
          <text:p text:style-name="P4"><text:span text:style-name="T5">Abishai</text:span></text:p>
          <text:p text:style-name="P4"><text:span text:style-name="T4">1Ch 2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99" draw:id="id299" draw:layer="layout" svg:width="3.048cm" svg:height="2.54cm" svg:x="46.801cm" svg:y="66.101cm">
          <text:p text:style-name="P4"><text:span text:style-name="T5">Joab</text:span></text:p>
          <text:p text:style-name="P4"><text:span text:style-name="T4">1Ch 2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95" draw:id="id295" draw:layer="layout" svg:width="3.048cm" svg:height="2.54cm" svg:x="50.202cm" svg:y="66.102cm">
          <text:p text:style-name="P4"><text:span text:style-name="T9">Asahel</text:span></text:p>
          <text:p text:style-name="P4"><text:span text:style-name="T4">1Ch 2: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97" draw:id="id297" draw:layer="layout" svg:width="3.048cm" svg:height="2.54cm" svg:x="50.702cm" svg:y="62.09cm">
          <text:p text:style-name="P4"><text:span text:style-name="T9">Jether</text:span><text:span text:style-name="T10"> </text:span><text:span text:style-name="T4">Ishmeelite</text:span></text:p>
          <text:p text:style-name="P4"><text:span text:style-name="T4">1Ch 2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98" draw:id="id298" draw:layer="layout" svg:width="3.048cm" svg:height="2.54cm" svg:x="53.603cm" svg:y="66.103cm">
          <text:p text:style-name="P4"><text:span text:style-name="T9">Amasa</text:span></text:p>
          <text:p text:style-name="P4"><text:span text:style-name="T4">1Ch 2: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274" draw:id="id274" draw:layer="layout" svg:width="3.048cm" svg:height="2.54cm" svg:x="42.631cm" svg:y="28.097cm">
          <text:p text:style-name="P4"><text:span text:style-name="T5">Daughter of Machir</text:span></text:p>
          <text:p text:style-name="P4"><text:span text:style-name="T4">1Ch 2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" draw:text-style-name="P6" xml:id="id217" draw:id="id217" draw:layer="layout" svg:width="3.404cm" svg:height="2.642cm" svg:x="42.451cm" svg:y="23.993cm">
          <text:p text:style-name="P4"><text:span text:style-name="T7">Machir</text:span></text:p>
          <text:p text:style-name="P4"><text:span text:style-name="T4">1Ch 2:21, 7:14</text:span></text:p>
          <text:p text:style-name="P4"><text:span text:style-name="T4">Num 26:29, 27:1</text:span></text:p>
          <text:p text:style-name="P4"><text:span text:style-name="T4">Jos 17:1</text:span></text:p>
          <text:p text:style-name="P4"><text:span text:style-name="T4">Gen 50: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94" draw:id="id294" draw:layer="layout" svg:width="3.048cm" svg:height="2.54cm" svg:x="39.128cm" svg:y="28.094cm">
          <text:p text:style-name="P4"><text:span text:style-name="T5">Gilead</text:span></text:p>
          <text:p text:style-name="P4"><text:span text:style-name="T4">Num 26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93" draw:id="id293" draw:layer="layout" svg:width="3.048cm" svg:height="2.54cm" svg:x="42.629cm" svg:y="32.495cm">
          <text:p text:style-name="P4"><text:span text:style-name="T5">Segub</text:span></text:p>
          <text:p text:style-name="P4"><text:span text:style-name="T4">1Ch 2: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92" draw:id="id292" draw:layer="layout" svg:width="3.048cm" svg:height="2.54cm" svg:x="42.63cm" svg:y="36.596cm">
          <text:p text:style-name="P4"><text:span text:style-name="T5">Jair</text:span></text:p>
          <text:p text:style-name="P4"><text:span text:style-name="T4">1Ch 2: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13" xml:id="id300" draw:id="id300" draw:layer="layout" svg:width="3.048cm" svg:height="2.54cm" svg:x="50.912cm" svg:y="28.103cm">
          <text:p text:style-name="P9"><text:span text:style-name="T16">Abiah</text:span></text:p>
          <text:p text:style-name="P9"><text:span text:style-name="T4">1Ch 2: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49.855cm" svg:y1="29.368cm" svg:x2="50.912cm" svg:y2="29.373cm" draw:start-shape="id272" draw:start-glue-point="1" draw:end-shape="id300" draw:end-glue-point="3" svg:d="M49855 29368c793 0 265 5 1057 5" svg:viewBox="0 0 1058 6">
          <text:p/>
        </draw:connector>
        <draw:custom-shape draw:style-name="gr7" draw:text-style-name="P6" xml:id="id301" draw:id="id301" draw:layer="layout" svg:width="3.048cm" svg:height="2.54cm" svg:x="50.91cm" svg:y="32.501cm">
          <text:p text:style-name="P4"><text:span text:style-name="T5">Ashur</text:span></text:p>
          <text:p text:style-name="P4"><text:span text:style-name="T4">1Ch 2:24</text:span></text:p>
          <text:p text:style-name="P4"><text:span text:style-name="T4">1Ch 4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52.434cm" svg:y1="32.501cm" svg:x2="52.436cm" svg:y2="30.643cm" draw:start-shape="id301" draw:start-glue-point="0" draw:end-shape="id300" draw:end-glue-point="2" svg:d="M52434 32501c0-1392 2-463 2-1858" svg:viewBox="0 0 3 1859">
          <text:p/>
        </draw:connector>
        <draw:connector draw:style-name="gr6" draw:text-style-name="P3" draw:layer="layout" draw:type="curve" svg:x1="40.032cm" svg:y1="35.039cm" svg:x2="25.836cm" svg:y2="36.6cm" draw:start-shape="id284" draw:start-glue-point="2" draw:end-shape="id302" draw:end-glue-point="0" svg:d="M40032 35039c0 1171-14196 391-14196 1561" svg:viewBox="0 0 14197 1562">
          <text:p/>
        </draw:connector>
        <draw:connector draw:style-name="gr2" draw:text-style-name="P3" draw:layer="layout" draw:type="curve" svg:x1="40.032cm" svg:y1="35.039cm" svg:x2="29.535cm" svg:y2="36.602cm" draw:start-shape="id284" draw:start-glue-point="2" draw:end-shape="id303" draw:end-glue-point="0" svg:d="M40032 35039c0 1173-10497 392-10497 1563" svg:viewBox="0 0 10498 1564">
          <text:p/>
        </draw:connector>
        <draw:custom-shape draw:style-name="gr29" draw:text-style-name="P11" xml:id="id304" draw:id="id304" draw:layer="layout" svg:width="3.251cm" svg:height="2.591cm" svg:x="50.816cm" svg:y="36.543cm">
          <text:p text:style-name="P4"><text:span text:style-name="T5">Tekoa</text:span></text:p>
          <text:p text:style-name="P4"><text:span text:style-name="T4">1Ch 2:24, 4:5</text:span></text:p>
          <text:p text:style-name="P4"><text:span text:style-name="T4">2Ch 11:6, 20:20</text:span></text:p>
          <text:p text:style-name="P4"><text:span text:style-name="T4">Jer 6:1, Amo 1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1" draw:text-style-name="P3" draw:layer="layout" draw:type="curve" svg:x1="52.441cm" svg:y1="36.543cm" svg:x2="52.434cm" svg:y2="35.041cm" draw:start-shape="id304" draw:start-glue-point="0" draw:end-shape="id301" draw:end-glue-point="2" svg:d="M52441 36543c0-1126-7-376-7-1502" svg:viewBox="0 0 8 1503">
          <text:p/>
        </draw:connector>
        <draw:custom-shape draw:style-name="gr30" draw:text-style-name="P11" xml:id="id305" draw:id="id305" draw:layer="layout" svg:width="3.15cm" svg:height="2.591cm" svg:x="35.525cm" svg:y="28.067cm">
          <text:p text:style-name="P4"><text:span text:style-name="T5">Gilead</text:span></text:p>
          <text:p text:style-name="P4"><text:span text:style-name="T4">Num 32:39,40</text:span></text:p>
          <text:p text:style-name="P4"><text:span text:style-name="T4">Deu 3: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1" draw:text-style-name="P3" draw:layer="layout" draw:type="curve" svg:x1="37.1cm" svg:y1="28.067cm" svg:x2="44.153cm" svg:y2="26.635cm" draw:start-shape="id305" draw:start-glue-point="0" draw:end-shape="id217" draw:end-glue-point="2" svg:d="M37100 28067c0-1074 7053-358 7053-1432" svg:viewBox="0 0 7054 1433">
          <text:p/>
        </draw:connector>
        <draw:custom-shape draw:style-name="gr7" draw:text-style-name="P6" xml:id="id284" draw:id="id284" draw:layer="layout" svg:width="3.048cm" svg:height="2.54cm" svg:x="38.508cm" svg:y="32.499cm">
          <text:p text:style-name="P4"><text:span text:style-name="T7">Jerahmeel</text:span></text:p>
          <text:p text:style-name="P4"><text:span text:style-name="T4">1Ch 2:9</text:span></text:p>
          <text:p text:style-name="P4"><text:span text:style-name="T4">1Ch 2:25</text:span></text:p>
          <text:p text:style-name="P4"><text:span text:style-name="T4">1Sa 30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302" draw:id="id302" draw:layer="layout" svg:width="3.302cm" svg:height="2.54cm" svg:x="24.185cm" svg:y="36.6cm">
          <text:p text:style-name="P4"><text:span text:style-name="T7">Ram</text:span></text:p>
          <text:p text:style-name="P4"><text:span text:style-name="T4">1Ch 2:25</text:span></text:p>
          <text:p text:style-name="P4"><text:span text:style-name="T4">1Ch 2: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03" draw:id="id303" draw:layer="layout" svg:width="3.048cm" svg:height="2.54cm" svg:x="28.011cm" svg:y="36.602cm">
          <text:p text:style-name="P4"><text:span text:style-name="T5">Bunah</text:span></text:p>
          <text:p text:style-name="P4"><text:span text:style-name="T4">1Ch 2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23" draw:id="id323" draw:layer="layout" svg:width="3.048cm" svg:height="2.54cm" svg:x="31.512cm" svg:y="36.603cm">
          <text:p text:style-name="P4"><text:span text:style-name="T5">Oren</text:span></text:p>
          <text:p text:style-name="P4"><text:span text:style-name="T4">1Ch 2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24" draw:id="id324" draw:layer="layout" svg:width="3.048cm" svg:height="2.54cm" svg:x="35.012cm" svg:y="36.603cm">
          <text:p text:style-name="P4"><text:span text:style-name="T5">Ozem</text:span></text:p>
          <text:p text:style-name="P4"><text:span text:style-name="T4">1Ch 2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25" draw:id="id325" draw:layer="layout" svg:width="3.048cm" svg:height="2.54cm" svg:x="38.513cm" svg:y="36.604cm">
          <text:p text:style-name="P4"><text:span text:style-name="T5">Ahijah</text:span></text:p>
          <text:p text:style-name="P4"><text:span text:style-name="T4">1Ch 2: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25.836cm" svg:y1="39.14cm" svg:x2="25.838cm" svg:y2="40.602cm" draw:start-shape="id302" draw:start-glue-point="2" draw:end-shape="id306" draw:end-glue-point="0" svg:d="M25836 39140c0 1098 2 367 2 1462" svg:viewBox="0 0 3 1463">
          <text:p/>
        </draw:connector>
        <draw:connector draw:style-name="gr2" draw:text-style-name="P3" draw:layer="layout" draw:type="curve" svg:x1="25.836cm" svg:y1="39.14cm" svg:x2="33.336cm" svg:y2="40.603cm" draw:start-shape="id302" draw:start-glue-point="2" draw:end-shape="id307" draw:end-glue-point="0" svg:d="M25836 39140c0 1098 7500 367 7500 1463" svg:viewBox="0 0 7501 1464">
          <text:p/>
        </draw:connector>
        <draw:connector draw:style-name="gr2" draw:text-style-name="P3" draw:layer="layout" draw:type="curve" svg:x1="22.037cm" svg:y1="39.141cm" svg:x2="22.038cm" svg:y2="40.602cm" draw:start-shape="id308" draw:start-glue-point="2" draw:end-shape="id309" draw:end-glue-point="0" svg:d="M22037 39141c0 1096 1 366 1 1461" svg:viewBox="0 0 2 1462">
          <text:p/>
        </draw:connector>
        <draw:connector draw:style-name="gr6" draw:text-style-name="P3" draw:layer="layout" draw:type="curve" draw:line-skew="-0.256cm" svg:x1="36.035cm" svg:y1="35.042cm" svg:x2="22.037cm" svg:y2="36.601cm" draw:start-shape="id310" draw:start-glue-point="2" draw:end-shape="id308" draw:end-glue-point="0" svg:d="M36035 35042c0 786-13998 7-13998 1559" svg:viewBox="0 0 13999 1560">
          <text:p/>
        </draw:connector>
        <draw:connector draw:style-name="gr2" draw:text-style-name="P3" draw:layer="layout" draw:type="curve" svg:x1="25.836cm" svg:y1="39.14cm" svg:x2="29.637cm" svg:y2="40.601cm" draw:start-shape="id302" draw:start-glue-point="2" draw:end-shape="id311" draw:end-glue-point="0" svg:d="M25836 39140c0 1096 3801 366 3801 1461" svg:viewBox="0 0 3802 1462">
          <text:p/>
        </draw:connector>
        <draw:connector draw:style-name="gr2" draw:text-style-name="P3" draw:layer="layout" draw:type="curve" svg:x1="22.037cm" svg:y1="39.141cm" svg:x2="18.239cm" svg:y2="40.603cm" draw:start-shape="id308" draw:start-glue-point="2" draw:end-shape="id312" draw:end-glue-point="0" svg:d="M22037 39141c0 1098-3798 367-3798 1462" svg:viewBox="0 0 3799 1463">
          <text:p/>
        </draw:connector>
        <draw:connector draw:style-name="gr2" draw:text-style-name="P3" draw:layer="layout" draw:type="curve" svg:x1="10.038cm" svg:y1="48.405cm" svg:x2="10.04cm" svg:y2="47.044cm" draw:start-shape="id313" draw:start-glue-point="0" draw:end-shape="id314" draw:end-glue-point="2" svg:d="M10038 48405c0-1020 2-340 2-1361" svg:viewBox="0 0 3 1362">
          <text:p/>
        </draw:connector>
        <draw:connector draw:style-name="gr2" draw:text-style-name="P3" draw:layer="layout" draw:type="curve" svg:x1="10.04cm" svg:y1="44.504cm" svg:x2="18.239cm" svg:y2="43.143cm" draw:start-shape="id314" draw:start-glue-point="0" draw:end-shape="id312" draw:end-glue-point="2" svg:d="M10040 44504c0-1020 8199-340 8199-1361" svg:viewBox="0 0 8200 1362">
          <text:p/>
        </draw:connector>
        <draw:connector draw:style-name="gr2" draw:text-style-name="P3" draw:layer="layout" draw:type="curve" svg:x1="13.839cm" svg:y1="44.503cm" svg:x2="18.239cm" svg:y2="43.143cm" draw:start-shape="id315" draw:start-glue-point="0" draw:end-shape="id312" draw:end-glue-point="2" svg:d="M13839 44503c0-1018 4400-339 4400-1360" svg:viewBox="0 0 4401 1361">
          <text:p/>
        </draw:connector>
        <draw:connector draw:style-name="gr6" draw:text-style-name="P3" draw:layer="layout" draw:type="curve" svg:x1="13.838cm" svg:y1="48.402cm" svg:x2="17.536cm" svg:y2="47.043cm" draw:start-shape="id316" draw:start-glue-point="0" draw:end-shape="id317" draw:end-glue-point="2" svg:d="M13838 48402c0-1018 3698-339 3698-1359" svg:viewBox="0 0 3699 1360">
          <text:p/>
        </draw:connector>
        <draw:connector draw:style-name="gr2" draw:text-style-name="P3" draw:layer="layout" draw:type="curve" svg:x1="25.839cm" svg:y1="44.403cm" svg:x2="22.038cm" svg:y2="43.142cm" draw:start-shape="id318" draw:start-glue-point="0" draw:end-shape="id309" draw:end-glue-point="2" svg:d="M25839 44403c0-945-3801-315-3801-1261" svg:viewBox="0 0 3802 1262">
          <text:p/>
        </draw:connector>
        <draw:connector draw:style-name="gr6" draw:text-style-name="P3" draw:layer="layout" draw:type="curve" svg:x1="10.043cm" svg:y1="77.762cm" svg:x2="10.043cm" svg:y2="77.402cm" draw:start-shape="id319" draw:start-glue-point="0" draw:end-shape="id320" draw:end-glue-point="2" svg:d="M10043 77762v-360" svg:viewBox="0 0 1 361">
          <text:p/>
        </draw:connector>
        <draw:connector draw:style-name="gr6" draw:text-style-name="P3" draw:layer="layout" draw:type="curve" svg:x1="10.044cm" svg:y1="80.663cm" svg:x2="10.043cm" svg:y2="80.302cm" draw:start-shape="id321" draw:start-glue-point="0" draw:end-shape="id319" draw:end-glue-point="2" svg:d="M10044 80663c0-270-1-90-1-361" svg:viewBox="0 0 2 362">
          <text:p/>
        </draw:connector>
        <draw:connector draw:style-name="gr2" draw:text-style-name="P3" draw:layer="layout" draw:type="curve" svg:x1="29.638cm" svg:y1="48.502cm" svg:x2="25.839cm" svg:y2="46.943cm" draw:start-shape="id322" draw:start-glue-point="0" draw:end-shape="id318" draw:end-glue-point="2" svg:d="M29638 48502c0-1168-3799-389-3799-1559" svg:viewBox="0 0 3800 1560">
          <text:p/>
        </draw:connector>
        <draw:connector draw:style-name="gr2" draw:text-style-name="P3" draw:layer="layout" draw:type="curve" svg:x1="40.032cm" svg:y1="35.039cm" svg:x2="33.036cm" svg:y2="36.603cm" draw:start-shape="id284" draw:start-glue-point="2" draw:end-shape="id323" draw:end-glue-point="0" svg:d="M40032 35039c0 1174-6996 393-6996 1564" svg:viewBox="0 0 6997 1565">
          <text:p/>
        </draw:connector>
        <draw:connector draw:style-name="gr2" draw:text-style-name="P3" draw:layer="layout" draw:type="curve" svg:x1="40.032cm" svg:y1="35.039cm" svg:x2="36.536cm" svg:y2="36.603cm" draw:start-shape="id284" draw:start-glue-point="2" draw:end-shape="id324" draw:end-glue-point="0" svg:d="M40032 35039c0 1174-3496 393-3496 1564" svg:viewBox="0 0 3497 1565">
          <text:p/>
        </draw:connector>
        <draw:connector draw:style-name="gr2" draw:text-style-name="P3" draw:layer="layout" draw:type="curve" svg:x1="40.032cm" svg:y1="35.039cm" svg:x2="40.037cm" svg:y2="36.604cm" draw:start-shape="id284" draw:start-glue-point="2" draw:end-shape="id325" draw:end-glue-point="0" svg:d="M40032 35039c0 1174 5 392 5 1565" svg:viewBox="0 0 6 1566">
          <text:p/>
        </draw:connector>
        <draw:custom-shape draw:style-name="gr8" draw:text-style-name="P7" xml:id="id310" draw:id="id310" draw:layer="layout" svg:width="3.048cm" svg:height="2.54cm" svg:x="34.511cm" svg:y="32.502cm">
          <text:p text:style-name="P4"><text:span text:style-name="T5">Atarah</text:span></text:p>
          <text:p text:style-name="P4"><text:span text:style-name="T4">1Ch 2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38.508cm" svg:y1="33.769cm" svg:x2="37.559cm" svg:y2="33.772cm" draw:start-shape="id284" draw:start-glue-point="3" draw:end-shape="id310" draw:end-glue-point="1" svg:d="M38508 33769c-711 0-237 3-949 3" svg:viewBox="0 0 950 4">
          <text:p/>
        </draw:connector>
        <draw:custom-shape draw:style-name="gr26" draw:text-style-name="P6" xml:id="id308" draw:id="id308" draw:layer="layout" svg:width="3.302cm" svg:height="2.54cm" svg:x="20.386cm" svg:y="36.601cm">
          <text:p text:style-name="P4"><text:span text:style-name="T5">Onam</text:span></text:p>
          <text:p text:style-name="P4"><text:span text:style-name="T4">1Ch 2: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311" draw:id="id311" draw:layer="layout" svg:width="3.302cm" svg:height="2.54cm" svg:x="27.986cm" svg:y="40.601cm">
          <text:p text:style-name="P4"><text:span text:style-name="T3">Jamin</text:span></text:p>
          <text:p text:style-name="P4"><text:span text:style-name="T4">1Ch 2: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07" draw:id="id307" draw:layer="layout" svg:width="3.048cm" svg:height="2.54cm" svg:x="31.812cm" svg:y="40.603cm">
          <text:p text:style-name="P4"><text:span text:style-name="T5">Eker</text:span></text:p>
          <text:p text:style-name="P4"><text:span text:style-name="T4">1Ch 2: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306" draw:id="id306" draw:layer="layout" svg:width="3.302cm" svg:height="2.54cm" svg:x="24.187cm" svg:y="40.602cm">
          <text:p text:style-name="P4"><text:span text:style-name="T5">Maaz</text:span></text:p>
          <text:p text:style-name="P4"><text:span text:style-name="T4">1Ch 2: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309" draw:id="id309" draw:layer="layout" svg:width="3.302cm" svg:height="2.54cm" svg:x="20.387cm" svg:y="40.602cm">
          <text:p text:style-name="P4"><text:span text:style-name="T3">Jada</text:span></text:p>
          <text:p text:style-name="P4"><text:span text:style-name="T4">1Ch 2:28,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312" draw:id="id312" draw:layer="layout" svg:width="3.302cm" svg:height="2.54cm" svg:x="16.588cm" svg:y="40.603cm">
          <text:p text:style-name="P4"><text:span text:style-name="T5">Shammai</text:span></text:p>
          <text:p text:style-name="P4"><text:span text:style-name="T4">1Ch 2:28,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315" draw:id="id315" draw:layer="layout" svg:width="3.302cm" svg:height="2.54cm" svg:x="12.188cm" svg:y="44.503cm">
          <text:p text:style-name="P4"><text:span text:style-name="T3">Abishur</text:span></text:p>
          <text:p text:style-name="P4"><text:span text:style-name="T4">1Ch 2: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314" draw:id="id314" draw:layer="layout" svg:width="3.302cm" svg:height="2.54cm" svg:x="8.389cm" svg:y="44.504cm">
          <text:p text:style-name="P4"><text:span text:style-name="T5">Nadab</text:span></text:p>
          <text:p text:style-name="P4"><text:span text:style-name="T4">1Ch 2: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317" draw:id="id317" draw:layer="layout" svg:width="3.048cm" svg:height="2.54cm" svg:x="16.012cm" svg:y="44.503cm">
          <text:p text:style-name="P4"><text:span text:style-name="T5">Abihail</text:span></text:p>
          <text:p text:style-name="P4"><text:span text:style-name="T4">1Ch 2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16.012cm" svg:y1="45.773cm" svg:x2="15.49cm" svg:y2="45.773cm" draw:start-shape="id317" draw:start-glue-point="3" draw:end-shape="id315" draw:end-glue-point="1" svg:d="M16012 45773h-522" svg:viewBox="0 0 523 1">
          <text:p/>
        </draw:connector>
        <draw:custom-shape draw:style-name="gr26" draw:text-style-name="P6" xml:id="id316" draw:id="id316" draw:layer="layout" svg:width="3.302cm" svg:height="2.54cm" svg:x="12.187cm" svg:y="48.402cm">
          <text:p text:style-name="P4"><text:span text:style-name="T3">Ahban</text:span></text:p>
          <text:p text:style-name="P4"><text:span text:style-name="T4">1Ch 2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26" draw:id="id326" draw:layer="layout" svg:width="3.048cm" svg:height="2.54cm" svg:x="16.013cm" svg:y="48.404cm">
          <text:p text:style-name="P4"><text:span text:style-name="T5">Molid</text:span></text:p>
          <text:p text:style-name="P4"><text:span text:style-name="T4">1Ch 2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17.537cm" svg:y1="48.404cm" svg:x2="17.536cm" svg:y2="47.043cm" draw:start-shape="id326" draw:start-glue-point="0" draw:end-shape="id317" draw:end-glue-point="2" svg:d="M17537 48404c0-1020-1-340-1-1361" svg:viewBox="0 0 2 1362">
          <text:p/>
        </draw:connector>
        <draw:custom-shape draw:style-name="gr26" draw:text-style-name="P6" xml:id="id327" draw:id="id327" draw:layer="layout" svg:width="3.302cm" svg:height="2.54cm" svg:x="4.688cm" svg:y="48.403cm">
          <text:p text:style-name="P4"><text:span text:style-name="T3">Seled</text:span></text:p>
          <text:p text:style-name="P4"><text:span text:style-name="T4">1Ch 2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13" draw:id="id313" draw:layer="layout" svg:width="3.048cm" svg:height="2.54cm" svg:x="8.514cm" svg:y="48.405cm">
          <text:p text:style-name="P4"><text:span text:style-name="T5">Appaim</text:span></text:p>
          <text:p text:style-name="P4"><text:span text:style-name="T4">1Ch 2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6.339cm" svg:y1="48.403cm" svg:x2="10.04cm" svg:y2="47.044cm" draw:start-shape="id327" draw:start-glue-point="0" draw:end-shape="id314" draw:end-glue-point="2" svg:d="M6339 48403c0-1018 3701-339 3701-1359" svg:viewBox="0 0 3702 1360">
          <text:p/>
        </draw:connector>
        <draw:connector draw:style-name="gr2" draw:text-style-name="P3" draw:layer="layout" draw:type="curve" svg:x1="10.039cm" svg:y1="51.408cm" svg:x2="10.038cm" svg:y2="50.945cm" draw:start-shape="id328" draw:start-glue-point="0" draw:end-shape="id313" draw:end-glue-point="2" svg:d="M10039 51408c0-346-1-115-1-463" svg:viewBox="0 0 2 464">
          <text:p/>
        </draw:connector>
        <draw:custom-shape draw:style-name="gr7" draw:text-style-name="P6" xml:id="id328" draw:id="id328" draw:layer="layout" svg:width="3.048cm" svg:height="2.54cm" svg:x="8.515cm" svg:y="51.408cm">
          <text:p text:style-name="P4"><text:span text:style-name="T5">Ishi</text:span></text:p>
          <text:p text:style-name="P4"><text:span text:style-name="T4">1Ch 2: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0.04cm" svg:y1="54.411cm" svg:x2="10.039cm" svg:y2="53.948cm" draw:start-shape="id329" draw:start-glue-point="0" draw:end-shape="id328" draw:end-glue-point="2" svg:d="M10040 54411c0-346-1-115-1-463" svg:viewBox="0 0 2 464">
          <text:p/>
        </draw:connector>
        <draw:custom-shape draw:style-name="gr7" draw:text-style-name="P6" xml:id="id329" draw:id="id329" draw:layer="layout" svg:width="3.048cm" svg:height="2.54cm" svg:x="8.516cm" svg:y="54.411cm">
          <text:p text:style-name="P4"><text:span text:style-name="T5">Sheshan</text:span></text:p>
          <text:p text:style-name="P4"><text:span text:style-name="T4">1Ch 2: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0.041cm" svg:y1="57.422cm" svg:x2="10.04cm" svg:y2="56.951cm" draw:start-shape="id330" draw:start-glue-point="0" draw:end-shape="id329" draw:end-glue-point="2" svg:d="M10041 57422c0-352-1-117-1-471" svg:viewBox="0 0 2 472">
          <text:p/>
        </draw:connector>
        <draw:custom-shape draw:style-name="gr8" draw:text-style-name="P7" xml:id="id330" draw:id="id330" draw:layer="layout" svg:width="3.048cm" svg:height="2.54cm" svg:x="8.517cm" svg:y="57.422cm">
          <text:p text:style-name="P4"><text:span text:style-name="T5">Ahlai</text:span></text:p>
          <text:p text:style-name="P4"><text:span text:style-name="T4">1Ch 2:31</text:span></text:p>
          <text:p text:style-name="P4"><text:span text:style-name="T4">1Ch 2: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318" draw:id="id318" draw:layer="layout" svg:width="3.302cm" svg:height="2.54cm" svg:x="24.188cm" svg:y="44.403cm">
          <text:p text:style-name="P4"><text:span text:style-name="T5">Jonathan</text:span></text:p>
          <text:p text:style-name="P4"><text:span text:style-name="T4">1Ch 2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331" draw:id="id331" draw:layer="layout" svg:width="3.302cm" svg:height="2.54cm" svg:x="20.388cm" svg:y="44.403cm">
          <text:p text:style-name="P4"><text:span text:style-name="T3">Jether</text:span></text:p>
          <text:p text:style-name="P4"><text:span text:style-name="T4">1Ch 2: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22.039cm" svg:y1="44.403cm" svg:x2="22.038cm" svg:y2="43.142cm" draw:start-shape="id331" draw:start-glue-point="0" draw:end-shape="id309" draw:end-glue-point="2" svg:d="M22039 44403c0-945-1-315-1-1261" svg:viewBox="0 0 2 1262">
          <text:p/>
        </draw:connector>
        <draw:custom-shape draw:style-name="gr26" draw:text-style-name="P6" xml:id="id322" draw:id="id322" draw:layer="layout" svg:width="3.302cm" svg:height="2.54cm" svg:x="27.987cm" svg:y="48.502cm">
          <text:p text:style-name="P4"><text:span text:style-name="T3">Zaza</text:span></text:p>
          <text:p text:style-name="P4"><text:span text:style-name="T4">1Ch 2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xml:id="id332" draw:id="id332" draw:layer="layout" svg:width="3.302cm" svg:height="2.54cm" svg:x="24.188cm" svg:y="48.503cm">
          <text:p text:style-name="P4"><text:span text:style-name="T5">Peleth</text:span></text:p>
          <text:p text:style-name="P4"><text:span text:style-name="T4">1Ch 2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25.839cm" svg:y1="48.503cm" svg:x2="25.839cm" svg:y2="46.943cm" draw:start-shape="id332" draw:start-glue-point="0" draw:end-shape="id318" draw:end-glue-point="2" svg:d="M25839 48503v-1560" svg:viewBox="0 0 1 1561">
          <text:p/>
        </draw:connector>
        <draw:custom-shape draw:style-name="gr7" draw:text-style-name="P6" xml:id="id333" draw:id="id333" draw:layer="layout" svg:width="3.048cm" svg:height="2.54cm" svg:x="12.217cm" svg:y="57.423cm">
          <text:p text:style-name="P4"><text:span text:style-name="T5">Jarha</text:span></text:p>
          <text:p text:style-name="P4"><text:span text:style-name="T4">Egyptian</text:span></text:p>
          <text:p text:style-name="P4"><text:span text:style-name="T4">1Ch 2:34,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12.217cm" svg:y1="58.693cm" svg:x2="11.565cm" svg:y2="58.692cm" draw:start-shape="id333" draw:start-glue-point="3" draw:end-shape="id330" draw:end-glue-point="1" svg:d="M12217 58693c-487 0-162-1-652-1" svg:viewBox="0 0 653 2">
          <text:p/>
        </draw:connector>
        <draw:custom-shape draw:style-name="gr7" draw:text-style-name="P6" xml:id="id334" draw:id="id334" draw:layer="layout" svg:width="3.048cm" svg:height="2.54cm" svg:x="8.517cm" svg:y="60.36cm">
          <text:p text:style-name="P4"><text:span text:style-name="T5">Attai</text:span></text:p>
          <text:p text:style-name="P4"><text:span text:style-name="T4">1Ch 2: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10.041cm" svg:y1="60.36cm" svg:x2="10.041cm" svg:y2="59.962cm" draw:start-shape="id334" draw:start-glue-point="0" draw:end-shape="id330" draw:end-glue-point="2" svg:d="M10041 60360v-398" svg:viewBox="0 0 1 399">
          <text:p/>
        </draw:connector>
        <draw:custom-shape draw:style-name="gr7" draw:text-style-name="P6" xml:id="id339" draw:id="id339" draw:layer="layout" svg:width="3.048cm" svg:height="2.54cm" svg:x="8.518cm" svg:y="63.261cm">
          <text:p text:style-name="P4"><text:span text:style-name="T5">Nathan</text:span></text:p>
          <text:p text:style-name="P4"><text:span text:style-name="T4">1Ch 2: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41" draw:id="id341" draw:layer="layout" svg:width="3.048cm" svg:height="2.54cm" svg:x="8.518cm" svg:y="66.161cm">
          <text:p text:style-name="P4"><text:span text:style-name="T5">Zabad</text:span></text:p>
          <text:p text:style-name="P4"><text:span text:style-name="T4">1Ch 2:36</text:span></text:p>
          <text:p text:style-name="P4"><text:span text:style-name="T4">1Ch 11:4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40" draw:id="id340" draw:layer="layout" svg:width="3.048cm" svg:height="2.54cm" svg:x="8.519cm" svg:y="69.062cm">
          <text:p text:style-name="P4"><text:span text:style-name="T5">Ephlal</text:span></text:p>
          <text:p text:style-name="P4"><text:span text:style-name="T4">1Ch 2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43" draw:id="id343" draw:layer="layout" svg:width="3.048cm" svg:height="2.54cm" svg:x="8.518cm" svg:y="71.961cm">
          <text:p text:style-name="P4"><text:span text:style-name="T5">Obed</text:span></text:p>
          <text:p text:style-name="P4"><text:span text:style-name="T4">1Ch 2: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20" draw:id="id320" draw:layer="layout" svg:width="3.048cm" svg:height="2.54cm" svg:x="8.519cm" svg:y="74.862cm">
          <text:p text:style-name="P4"><text:span text:style-name="T5">Jehu</text:span></text:p>
          <text:p text:style-name="P4"><text:span text:style-name="T4">1Ch 2:3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19" draw:id="id319" draw:layer="layout" svg:width="3.048cm" svg:height="2.54cm" svg:x="8.519cm" svg:y="77.762cm">
          <text:p text:style-name="P4"><text:span text:style-name="T5">Azariah</text:span></text:p>
          <text:p text:style-name="P4"><text:span text:style-name="T4">1Ch 2:3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21" draw:id="id321" draw:layer="layout" svg:width="3.048cm" svg:height="2.54cm" svg:x="8.52cm" svg:y="80.663cm">
          <text:p text:style-name="P4"><text:span text:style-name="T5">Helez</text:span></text:p>
          <text:p text:style-name="P4"><text:span text:style-name="T4">1Ch 2:3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35" draw:id="id335" draw:layer="layout" svg:width="3.048cm" svg:height="2.54cm" svg:x="8.52cm" svg:y="83.563cm">
          <text:p text:style-name="P4"><text:span text:style-name="T5">Eleasah</text:span></text:p>
          <text:p text:style-name="P4"><text:span text:style-name="T4">1Ch 2:3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36" draw:id="id336" draw:layer="layout" svg:width="3.048cm" svg:height="2.54cm" svg:x="8.52cm" svg:y="86.563cm">
          <text:p text:style-name="P4"><text:span text:style-name="T5">Sisamai</text:span></text:p>
          <text:p text:style-name="P4"><text:span text:style-name="T4">1Ch 2:4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42" draw:id="id342" draw:layer="layout" svg:width="3.048cm" svg:height="2.54cm" svg:x="8.521cm" svg:y="89.564cm">
          <text:p text:style-name="P4"><text:span text:style-name="T5">Shallum</text:span></text:p>
          <text:p text:style-name="P4"><text:span text:style-name="T4">1Ch 2:4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10.044cm" svg:y1="83.563cm" svg:x2="10.044cm" svg:y2="83.203cm" draw:start-shape="id335" draw:start-glue-point="0" draw:end-shape="id321" draw:end-glue-point="2" svg:d="M10044 83563v-360" svg:viewBox="0 0 1 361">
          <text:p/>
        </draw:connector>
        <draw:connector draw:style-name="gr6" draw:text-style-name="P3" draw:layer="layout" draw:type="curve" svg:x1="10.044cm" svg:y1="86.563cm" svg:x2="10.044cm" svg:y2="86.103cm" draw:start-shape="id336" draw:start-glue-point="0" draw:end-shape="id335" draw:end-glue-point="2" svg:d="M10044 86563v-460" svg:viewBox="0 0 1 461">
          <text:p/>
        </draw:connector>
        <draw:connector draw:style-name="gr6" draw:text-style-name="P3" draw:layer="layout" draw:type="curve" svg:x1="10.047cm" svg:y1="95.566cm" svg:x2="10.046cm" svg:y2="95.105cm" draw:start-shape="id337" draw:start-glue-point="0" draw:end-shape="id338" draw:end-glue-point="2" svg:d="M10047 95566c0-345-1-115-1-461" svg:viewBox="0 0 2 462">
          <text:p/>
        </draw:connector>
        <draw:connector draw:style-name="gr6" draw:text-style-name="P3" draw:layer="layout" draw:type="curve" svg:x1="10.042cm" svg:y1="63.261cm" svg:x2="10.041cm" svg:y2="62.9cm" draw:start-shape="id339" draw:start-glue-point="0" draw:end-shape="id334" draw:end-glue-point="2" svg:d="M10042 63261c0-270-1-90-1-361" svg:viewBox="0 0 2 362">
          <text:p/>
        </draw:connector>
        <draw:connector draw:style-name="gr6" draw:text-style-name="P3" draw:layer="layout" draw:type="curve" svg:x1="10.043cm" svg:y1="69.062cm" svg:x2="10.042cm" svg:y2="68.701cm" draw:start-shape="id340" draw:start-glue-point="0" draw:end-shape="id341" draw:end-glue-point="2" svg:d="M10043 69062c0-270-1-90-1-361" svg:viewBox="0 0 2 362">
          <text:p/>
        </draw:connector>
        <draw:connector draw:style-name="gr6" draw:text-style-name="P3" draw:layer="layout" draw:type="curve" svg:x1="10.042cm" svg:y1="66.161cm" svg:x2="10.042cm" svg:y2="65.801cm" draw:start-shape="id341" draw:start-glue-point="0" draw:end-shape="id339" draw:end-glue-point="2" svg:d="M10042 66161v-360" svg:viewBox="0 0 1 361">
          <text:p/>
        </draw:connector>
        <draw:connector draw:style-name="gr6" draw:text-style-name="P3" draw:layer="layout" draw:type="curve" svg:x1="10.045cm" svg:y1="89.564cm" svg:x2="10.044cm" svg:y2="89.103cm" draw:start-shape="id342" draw:start-glue-point="0" draw:end-shape="id336" draw:end-glue-point="2" svg:d="M10045 89564c0-345-1-115-1-461" svg:viewBox="0 0 2 462">
          <text:p/>
        </draw:connector>
        <draw:connector draw:style-name="gr6" draw:text-style-name="P3" draw:layer="layout" draw:type="curve" svg:x1="10.042cm" svg:y1="71.961cm" svg:x2="10.043cm" svg:y2="71.602cm" draw:start-shape="id343" draw:start-glue-point="0" draw:end-shape="id340" draw:end-glue-point="2" svg:d="M10042 71961c0-268 1-89 1-359" svg:viewBox="0 0 2 360">
          <text:p/>
        </draw:connector>
        <draw:connector draw:style-name="gr6" draw:text-style-name="P3" draw:layer="layout" draw:type="curve" svg:x1="10.043cm" svg:y1="74.862cm" svg:x2="10.042cm" svg:y2="74.501cm" draw:start-shape="id320" draw:start-glue-point="0" draw:end-shape="id343" draw:end-glue-point="2" svg:d="M10043 74862c0-270-1-90-1-361" svg:viewBox="0 0 2 362">
          <text:p/>
        </draw:connector>
        <draw:custom-shape draw:style-name="gr7" draw:text-style-name="P6" xml:id="id338" draw:id="id338" draw:layer="layout" svg:width="3.048cm" svg:height="2.54cm" svg:x="8.522cm" svg:y="92.565cm">
          <text:p text:style-name="P4"><text:span text:style-name="T5">Jekamiah</text:span></text:p>
          <text:p text:style-name="P4"><text:span text:style-name="T4">1Ch 2:4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37" draw:id="id337" draw:layer="layout" svg:width="3.048cm" svg:height="2.54cm" svg:x="8.523cm" svg:y="95.566cm">
          <text:p text:style-name="P4"><text:span text:style-name="T5">Elishama</text:span></text:p>
          <text:p text:style-name="P4"><text:span text:style-name="T4">1Ch 2:4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10.046cm" svg:y1="92.565cm" svg:x2="10.045cm" svg:y2="92.104cm" draw:start-shape="id338" draw:start-glue-point="0" draw:end-shape="id342" draw:end-glue-point="2" svg:d="M10046 92565c0-345-1-115-1-461" svg:viewBox="0 0 2 462">
          <text:p/>
        </draw:connector>
        <draw:custom-shape draw:style-name="gr8" draw:text-style-name="P13" xml:id="id279" draw:id="id279" draw:layer="layout" svg:width="3.048cm" svg:height="2.54cm" svg:x="42.91cm" svg:y="43.301cm">
          <text:p text:style-name="P9"><text:span text:style-name="T5">Rahab</text:span></text:p>
          <text:p text:style-name="P9"><text:span text:style-name="T4">Jos 6:25</text:span></text:p>
          <text:p text:style-name="P9"><text:span text:style-name="T5">Rachab</text:span></text:p>
          <text:p text:style-name="P9"><text:span text:style-name="T4">Mat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281" draw:id="id281" draw:layer="layout" svg:width="3.048cm" svg:height="2.54cm" svg:x="42.911cm" svg:y="46.902cm">
          <text:p text:style-name="P4"><text:span text:style-name="T5">Ruth</text:span></text:p>
          <text:p text:style-name="P4"><text:span text:style-name="T4">Mat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draw:layer="layout" draw:type="curve" svg:x1="46.809cm" svg:y1="44.57cm" svg:x2="45.958cm" svg:y2="44.571cm" draw:start-shape="id275" draw:start-glue-point="3" draw:end-shape="id279" draw:end-glue-point="1" svg:d="M46809 44570c-637 0-212 1-851 1" svg:viewBox="0 0 852 2">
          <text:p/>
        </draw:connector>
        <draw:connector draw:style-name="gr9" draw:text-style-name="P3" draw:layer="layout" draw:type="curve" svg:x1="46.809cm" svg:y1="48.17cm" svg:x2="45.959cm" svg:y2="48.172cm" draw:start-shape="id278" draw:start-glue-point="3" draw:end-shape="id281" draw:end-glue-point="1" svg:d="M46809 48170c-636 0-211 2-850 2" svg:viewBox="0 0 851 3">
          <text:p/>
        </draw:connector>
        <draw:connector draw:style-name="gr6" draw:text-style-name="P3" draw:layer="layout" draw:type="curve" svg:x1="87.736cm" svg:y1="38.259cm" svg:x2="87.723cm" svg:y2="35.498cm" draw:start-shape="id344" draw:start-glue-point="0" draw:end-shape="id255" draw:end-glue-point="2" svg:d="M87736 38259c0-2070-13-690-13-2761" svg:viewBox="0 0 14 2762">
          <text:p/>
        </draw:connector>
        <draw:connector draw:style-name="gr31" draw:text-style-name="P3" draw:layer="layout" draw:type="curve" svg:x1="91.164cm" svg:y1="81cm" svg:x2="109.467cm" svg:y2="81.465cm" draw:start-shape="id345" draw:start-glue-point="2" svg:d="M91164 81000c0 753 18303 520 18303 465" svg:viewBox="0 0 18304 543">
          <text:p/>
        </draw:connector>
        <draw:connector draw:style-name="gr31" draw:text-style-name="P3" draw:layer="layout" draw:type="curve" svg:x1="118.141cm" svg:y1="67.982cm" svg:x2="118.14cm" svg:y2="77.372cm" draw:start-shape="id346" draw:start-glue-point="2" draw:end-shape="id347" draw:end-glue-point="11" svg:d="M118141 67982c0 5889-1 1194-1 9390" svg:viewBox="0 0 2 9391">
          <text:p/>
        </draw:connector>
        <draw:connector draw:style-name="gr32" draw:text-style-name="P36" draw:layer="layout" draw:type="curve" draw:line-skew="0.616cm" svg:x1="108.645cm" svg:y1="68.96cm" svg:x2="87.736cm" svg:y2="40.799cm" draw:start-shape="id348" draw:start-glue-point="0" draw:end-shape="id344" draw:end-glue-point="2" svg:d="M108645 68960c0-20196-20909-6116-20909-28161" svg:viewBox="0 0 20910 28162">
          <text:p text:style-name="P14"><text:span text:style-name="T33">Both Hur &amp; Salma</text:span></text:p>
          <text:p text:style-name="P14"><text:span text:style-name="T33">are called the fathers</text:span></text:p>
          <text:p text:style-name="P15"><text:span text:style-name="T33">of Beth-lehem</text:span></text:p>
        </draw:connector>
        <draw:connector draw:style-name="gr2" draw:text-style-name="P3" draw:layer="layout" draw:type="curve" svg:x1="92.738cm" svg:y1="57.401cm" svg:x2="92.736cm" svg:y2="60.859cm" draw:start-shape="id349" draw:start-glue-point="2" draw:end-shape="id350" draw:end-glue-point="0" svg:d="M92738 57401c0 2595-2 866-2 3458" svg:viewBox="0 0 3 3459">
          <text:p/>
        </draw:connector>
        <draw:connector draw:style-name="gr2" draw:text-style-name="P3" draw:layer="layout" draw:type="curve" svg:x1="92.738cm" svg:y1="57.401cm" svg:x2="108.643cm" svg:y2="60.86cm" draw:start-shape="id349" draw:start-glue-point="2" draw:end-shape="id351" draw:end-glue-point="0" svg:d="M92738 57401c0 2595 15905 866 15905 3459" svg:viewBox="0 0 15906 3460">
          <text:p/>
        </draw:connector>
        <draw:connector draw:style-name="gr2" draw:text-style-name="P3" draw:layer="layout" draw:type="curve" svg:x1="134.106cm" svg:y1="60.857cm" svg:x2="92.738cm" svg:y2="57.401cm" draw:start-shape="id352" draw:start-glue-point="0" draw:end-shape="id349" draw:end-glue-point="2" svg:d="M134106 60857c0-2590-41368-863-41368-3456" svg:viewBox="0 0 41369 3457">
          <text:p/>
        </draw:connector>
        <draw:connector draw:style-name="gr2" draw:text-style-name="P3" draw:layer="layout" draw:type="curve" svg:x1="92.736cm" svg:y1="63.399cm" svg:x2="69.137cm" svg:y2="66.96cm" draw:start-shape="id350" draw:start-glue-point="2" draw:end-shape="id353" draw:end-glue-point="0" svg:d="M92736 63399c0 2671-23599 891-23599 3561" svg:viewBox="0 0 23600 3562">
          <text:p/>
        </draw:connector>
        <draw:connector draw:style-name="gr33" draw:text-style-name="P3" draw:layer="layout" draw:type="curve" svg:x1="92.736cm" svg:y1="63.399cm" svg:x2="94.992cm" svg:y2="65.461cm" draw:start-shape="id350" draw:start-glue-point="2" draw:end-shape="id354" draw:end-glue-point="0" svg:d="M92736 63399c0 1548 2256 517 2256 2062" svg:viewBox="0 0 2257 2063">
          <text:p/>
        </draw:connector>
        <draw:connector draw:style-name="gr6" draw:text-style-name="P3" draw:layer="layout" draw:type="curve" svg:x1="87.736cm" svg:y1="40.799cm" svg:x2="87.737cm" svg:y2="54.86cm" draw:start-shape="id344" draw:start-glue-point="2" draw:end-shape="id355" draw:end-glue-point="0" svg:d="M87736 40799c0 10546 1 3516 1 14061" svg:viewBox="0 0 2 14062">
          <text:p/>
        </draw:connector>
        <draw:connector draw:style-name="gr6" draw:text-style-name="P3" draw:layer="layout" draw:type="curve" svg:x1="87.738cm" svg:y1="59.861cm" svg:x2="87.737cm" svg:y2="57.4cm" draw:start-shape="id356" draw:start-glue-point="0" draw:end-shape="id355" draw:end-glue-point="2" svg:d="M87738 59861c0-1845-1-615-1-2461" svg:viewBox="0 0 2 2462">
          <text:p/>
        </draw:connector>
        <draw:custom-shape draw:style-name="gr8" draw:text-style-name="P7" xml:id="id255" draw:id="id255" draw:layer="layout" svg:width="3.048cm" svg:height="2.54cm" svg:x="86.199cm" svg:y="32.958cm">
          <text:p text:style-name="P4"><text:span text:style-name="T5">Ephrath</text:span></text:p>
          <text:p text:style-name="P4"><text:span text:style-name="T4">1Ch 2:19</text:span></text:p>
          <text:p text:style-name="P4"><text:span text:style-name="T14">Ephratah</text:span></text:p>
          <text:p text:style-name="P4"><text:span text:style-name="T4">1Ch 2: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44" draw:id="id344" draw:layer="layout" svg:width="3.048cm" svg:height="2.54cm" svg:x="86.212cm" svg:y="38.259cm">
          <text:p text:style-name="P4"><text:span text:style-name="T7">Hur</text:span></text:p>
          <text:p text:style-name="P4"><text:span text:style-name="T4">1Ch 2:19,50, 4:1,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5" xml:id="id355" draw:id="id355" draw:layer="layout" svg:width="3.048cm" svg:height="2.54cm" svg:x="86.213cm" svg:y="54.86cm">
          <text:p text:style-name="P4"><text:span text:style-name="T5">Uri</text:span></text:p>
          <text:p text:style-name="P4"><text:span text:style-name="T4">1Ch 2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56" draw:id="id356" draw:layer="layout" svg:width="3.048cm" svg:height="2.54cm" svg:x="86.214cm" svg:y="59.861cm">
          <text:p text:style-name="P4"><text:span text:style-name="T5">Bezaleel</text:span></text:p>
          <text:p text:style-name="P4"><text:span text:style-name="T4">1Ch 2:20</text:span></text:p>
          <text:p text:style-name="P4"><text:span text:style-name="T4">Exo 31:2,30, 36:1,2, 37:1, 38:22, 2Ch 1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49" draw:id="id349" draw:layer="layout" svg:width="3.048cm" svg:height="2.54cm" svg:x="91.214cm" svg:y="54.861cm">
          <text:p text:style-name="P4"><text:span text:style-name="T5">Caleb</text:span></text:p>
          <text:p text:style-name="P4"><text:span text:style-name="T4">1Ch 2: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52" draw:id="id352" draw:layer="layout" svg:width="3.048cm" svg:height="2.54cm" svg:x="132.582cm" svg:y="60.857cm">
          <text:p text:style-name="P4"><text:span text:style-name="T5">Hareph</text:span></text:p>
          <text:p text:style-name="P4"><text:span text:style-name="T4">1Ch 2:5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50" draw:id="id350" draw:layer="layout" svg:width="3.048cm" svg:height="2.54cm" svg:x="91.212cm" svg:y="60.859cm">
          <text:p text:style-name="P4"><text:span text:style-name="T5">Shobal</text:span></text:p>
          <text:p text:style-name="P4"><text:span text:style-name="T4">1Ch 2: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51" draw:id="id351" draw:layer="layout" svg:width="3.048cm" svg:height="2.54cm" svg:x="107.119cm" svg:y="60.86cm">
          <text:p text:style-name="P4"><text:span text:style-name="T3">Salma</text:span></text:p>
          <text:p text:style-name="P4"><text:span text:style-name="T4">1Ch 2:5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4" draw:text-style-name="P11" xml:id="id357" draw:id="id357" draw:layer="layout" svg:width="3.708cm" svg:height="3.251cm" svg:x="90.884cm" svg:y="69.06cm">
          <text:p text:style-name="P4"><text:span text:style-name="T5">Kirjath-jearim</text:span></text:p>
          <text:p text:style-name="P4"><text:span text:style-name="T4">1Ch 2:50</text:span></text:p>
          <text:p text:style-name="P4"><text:span text:style-name="T14">Kirjath-baal</text:span></text:p>
          <text:p text:style-name="P4"><text:span text:style-name="T4">Jos 15:60</text:span></text:p>
          <text:p text:style-name="P4"><text:span text:style-name="T14">Baalah</text:span></text:p>
          <text:p text:style-name="P4"><text:span text:style-name="T4">1Ch 13: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1" draw:text-style-name="P3" draw:layer="layout" draw:type="curve" svg:x1="92.738cm" svg:y1="69.06cm" svg:x2="92.736cm" svg:y2="63.399cm" draw:start-shape="id357" draw:start-glue-point="0" draw:end-shape="id350" draw:end-glue-point="2" svg:d="M92738 69060c0-4245-2-1415-2-5661" svg:viewBox="0 0 3 5662">
          <text:p/>
        </draw:connector>
        <draw:custom-shape draw:style-name="gr35" draw:text-style-name="P11" xml:id="id348" draw:id="id348" draw:layer="layout" svg:width="4.521cm" svg:height="3.759cm" svg:x="106.385cm" svg:y="68.96cm">
          <text:p text:style-name="P4"><text:span text:style-name="T5">Beth-lehem</text:span></text:p>
          <text:p text:style-name="P4"><text:span text:style-name="T4">1Ch 2:51</text:span></text:p>
          <text:p text:style-name="P4"><text:span text:style-name="T14">Ephrath</text:span></text:p>
          <text:p text:style-name="P4"><text:span text:style-name="T4">Gen 35:19, 48:7</text:span></text:p>
          <text:p text:style-name="P4"><text:span text:style-name="T14">Beth-lehem-judah</text:span></text:p>
          <text:p text:style-name="P4"><text:span text:style-name="T4">Jdg 17:7,8,9, 19:1,2,18, Rth 1:1,2, 1Sa 17: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1" draw:text-style-name="P3" draw:layer="layout" draw:type="curve" svg:x1="108.645cm" svg:y1="68.96cm" svg:x2="108.643cm" svg:y2="63.4cm" draw:start-shape="id348" draw:start-glue-point="0" draw:end-shape="id351" draw:end-glue-point="2" svg:d="M108645 68960c0-4170-2-1390-2-5560" svg:viewBox="0 0 3 5561">
          <text:p/>
        </draw:connector>
        <draw:custom-shape draw:style-name="gr36" draw:text-style-name="P11" xml:id="id358" draw:id="id358" draw:layer="layout" svg:width="3.251cm" svg:height="2.54cm" svg:x="132.485cm" svg:y="65.438cm">
          <text:p text:style-name="P4"><text:span text:style-name="T5">Beth-gader</text:span></text:p>
          <text:p text:style-name="P4"><text:span text:style-name="T4">1Ch 2:5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1" draw:text-style-name="P3" draw:layer="layout" draw:type="curve" svg:x1="134.11cm" svg:y1="65.438cm" svg:x2="134.106cm" svg:y2="63.397cm" draw:start-shape="id358" draw:start-glue-point="0" draw:end-shape="id352" draw:end-glue-point="2" svg:d="M134110 65438c0-1530-4-510-4-2041" svg:viewBox="0 0 5 2042">
          <text:p/>
        </draw:connector>
        <draw:custom-shape draw:style-name="gr7" draw:text-style-name="P6" xml:id="id353" draw:id="id353" draw:layer="layout" svg:width="3.048cm" svg:height="2.54cm" svg:x="67.613cm" svg:y="66.96cm">
          <text:p text:style-name="P4"><text:span text:style-name="T5">Haroeh</text:span></text:p>
          <text:p text:style-name="P4"><text:span text:style-name="T4">1Ch 2:52</text:span></text:p>
          <text:p text:style-name="P9"><text:span text:style-name="T9">Reaiah</text:span></text:p>
          <text:p text:style-name="P9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8" xml:id="id354" draw:id="id354" draw:layer="layout" svg:width="3.556cm" svg:height="2.54cm" svg:x="93.214cm" svg:y="65.461cm">
          <text:p text:style-name="P4"><text:span text:style-name="T5">Half of the Manahethites</text:span></text:p>
          <text:p text:style-name="P4"><text:span text:style-name="T4">1Ch 2:5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8" xml:id="id361" draw:id="id361" draw:layer="layout" svg:width="3.048cm" svg:height="2.54cm" svg:x="96.81cm" svg:y="73.957cm">
          <text:p text:style-name="P4"><text:span text:style-name="T5">Mishraites</text:span></text:p>
          <text:p text:style-name="P4"><text:span text:style-name="T4">1Ch 2:5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8" xml:id="id362" draw:id="id362" draw:layer="layout" svg:width="3.048cm" svg:height="2.54cm" svg:x="86.012cm" svg:y="73.959cm">
          <text:p text:style-name="P4"><text:span text:style-name="T5">Ithrites</text:span></text:p>
          <text:p text:style-name="P4"><text:span text:style-name="T4">1Ch 2:5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8" xml:id="id359" draw:id="id359" draw:layer="layout" svg:width="3.048cm" svg:height="2.54cm" svg:x="89.512cm" svg:y="73.959cm">
          <text:p text:style-name="P4"><text:span text:style-name="T5">Puhites</text:span></text:p>
          <text:p text:style-name="P4"><text:span text:style-name="T4">1Ch 2:5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8" xml:id="id360" draw:id="id360" draw:layer="layout" svg:width="3.302cm" svg:height="2.54cm" svg:x="93.013cm" svg:y="73.96cm">
          <text:p text:style-name="P4"><text:span text:style-name="T3">Shumathites</text:span></text:p>
          <text:p text:style-name="P4"><text:span text:style-name="T4">1Ch 2:5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" draw:text-style-name="P3" draw:layer="layout" draw:type="curve" svg:x1="91.036cm" svg:y1="73.959cm" svg:x2="92.738cm" svg:y2="72.311cm" draw:start-shape="id359" draw:start-glue-point="0" svg:d="M91036 73959c0-1611 1702-787 1702-1648" svg:viewBox="0 0 1703 1649">
          <text:p/>
        </draw:connector>
        <draw:connector draw:style-name="gr15" draw:text-style-name="P3" draw:layer="layout" draw:type="curve" svg:x1="94.664cm" svg:y1="73.96cm" svg:x2="92.738cm" svg:y2="72.311cm" draw:start-shape="id360" draw:start-glue-point="0" svg:d="M94664 73960c0-1612-1926-788-1926-1649" svg:viewBox="0 0 1927 1650">
          <text:p/>
        </draw:connector>
        <draw:connector draw:style-name="gr15" draw:text-style-name="P3" draw:layer="layout" draw:type="curve" svg:x1="98.334cm" svg:y1="73.957cm" svg:x2="92.739cm" svg:y2="72.312cm" draw:start-shape="id361" draw:start-glue-point="0" svg:d="M98334 73957c0-1609-5595-787-5595-1645" svg:viewBox="0 0 5596 1646">
          <text:p/>
        </draw:connector>
        <draw:connector draw:style-name="gr15" draw:text-style-name="P3" xml:id="id397" draw:id="id397" draw:layer="layout" draw:type="curve" svg:x1="87.536cm" svg:y1="73.959cm" svg:x2="92.74cm" svg:y2="72.313cm" draw:start-shape="id362" draw:start-glue-point="0" svg:d="M87536 73959c0-1609 5204-787 5204-1646" svg:viewBox="0 0 5205 1647">
          <text:p/>
        </draw:connector>
        <draw:custom-shape draw:style-name="gr14" draw:text-style-name="P8" xml:id="id345" draw:id="id345" draw:layer="layout" svg:width="3.302cm" svg:height="2.54cm" svg:x="89.513cm" svg:y="78.46cm">
          <text:p text:style-name="P4"><text:span text:style-name="T5">Zareathites</text:span></text:p>
          <text:p text:style-name="P4"><text:span text:style-name="T18">Post-captivity</text:span><text:span text:style-name="T19">*</text:span></text:p>
          <text:p text:style-name="P4"><text:span text:style-name="T4">1Ch 2:53</text:span></text:p>
          <text:p text:style-name="P9"><text:span text:style-name="T18">Neh 11: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8" xml:id="id363" draw:id="id363" draw:layer="layout" svg:width="3.302cm" svg:height="2.54cm" svg:x="93.014cm" svg:y="78.461cm">
          <text:p text:style-name="P4"><text:span text:style-name="T3">Eshtaulites</text:span></text:p>
          <text:p text:style-name="P4"><text:span text:style-name="T4">1Ch 2:53</text:span></text:p>
          <text:p text:style-name="P9"><text:span text:style-name="T20">Eshtaol</text:span></text:p>
          <text:p text:style-name="P4"><text:span text:style-name="T4">Jos 15: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" draw:text-style-name="P3" draw:layer="layout" draw:type="curve" svg:x1="98.334cm" svg:y1="76.497cm" svg:x2="94.665cm" svg:y2="78.461cm" draw:start-shape="id361" draw:start-glue-point="2" draw:end-shape="id363" draw:end-glue-point="0" svg:d="M98334 76497c0 1474-3669 493-3669 1964" svg:viewBox="0 0 3670 1965">
          <text:p/>
        </draw:connector>
        <draw:connector draw:style-name="gr15" draw:text-style-name="P3" draw:layer="layout" draw:type="curve" svg:x1="94.664cm" svg:y1="76.5cm" svg:x2="94.666cm" svg:y2="78.161cm" draw:start-shape="id360" draw:start-glue-point="2" svg:d="M94664 76500c0 1623 2 793 2 1661" svg:viewBox="0 0 3 1662">
          <text:p/>
        </draw:connector>
        <draw:connector draw:style-name="gr15" draw:text-style-name="P3" draw:layer="layout" draw:type="curve" svg:x1="91.036cm" svg:y1="76.499cm" svg:x2="94.666cm" svg:y2="78.162cm" draw:start-shape="id359" draw:start-glue-point="2" svg:d="M91036 76499c0 1624 3630 793 3630 1663" svg:viewBox="0 0 3631 1664">
          <text:p/>
        </draw:connector>
        <draw:connector draw:style-name="gr15" draw:text-style-name="P3" draw:layer="layout" draw:type="curve" svg:x1="87.536cm" svg:y1="76.499cm" svg:x2="94.666cm" svg:y2="78.163cm" draw:start-shape="id362" draw:start-glue-point="2" svg:d="M87536 76499c0 1624 7130 793 7130 1664" svg:viewBox="0 0 7131 1665">
          <text:p/>
        </draw:connector>
        <draw:connector draw:style-name="gr15" draw:text-style-name="P3" draw:layer="layout" draw:type="curve" svg:x1="87.536cm" svg:y1="76.499cm" svg:x2="91.164cm" svg:y2="78.46cm" draw:start-shape="id362" draw:start-glue-point="2" draw:end-shape="id345" draw:end-glue-point="0" svg:d="M87536 76499c0 1471 3628 491 3628 1961" svg:viewBox="0 0 3629 1962">
          <text:p/>
        </draw:connector>
        <draw:connector draw:style-name="gr15" draw:text-style-name="P3" draw:layer="layout" draw:type="curve" svg:x1="91.036cm" svg:y1="76.499cm" svg:x2="91.038cm" svg:y2="78.161cm" draw:start-shape="id359" draw:start-glue-point="2" svg:d="M91036 76499c0 1623 2 792 2 1662" svg:viewBox="0 0 3 1663">
          <text:p/>
        </draw:connector>
        <draw:connector draw:style-name="gr15" draw:text-style-name="P3" draw:layer="layout" draw:type="curve" svg:x1="94.664cm" svg:y1="76.5cm" svg:x2="91.038cm" svg:y2="78.161cm" draw:start-shape="id360" draw:start-glue-point="2" svg:d="M94664 76500c0 1623-3626 793-3626 1661" svg:viewBox="0 0 3627 1662">
          <text:p/>
        </draw:connector>
        <draw:connector draw:style-name="gr15" draw:text-style-name="P3" draw:layer="layout" draw:type="curve" svg:x1="98.334cm" svg:y1="76.497cm" svg:x2="91.038cm" svg:y2="78.162cm" draw:start-shape="id361" draw:start-glue-point="2" svg:d="M98334 76497c0 1626-7296 794-7296 1665" svg:viewBox="0 0 7297 1666">
          <text:p/>
        </draw:connector>
        <draw:custom-shape draw:style-name="gr38" draw:text-style-name="P8" xml:id="id364" draw:id="id364" draw:layer="layout" svg:width="3.607cm" svg:height="2.54cm" svg:x="101.015cm" svg:y="65.44cm">
          <text:p text:style-name="P4"><text:span text:style-name="T5">Netophathites</text:span></text:p>
          <text:p text:style-name="P4"><text:span text:style-name="T4">1Ch 2:5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" draw:text-style-name="P3" draw:layer="layout" draw:type="curve" svg:x1="102.818cm" svg:y1="65.44cm" svg:x2="108.643cm" svg:y2="63.4cm" draw:start-shape="id364" draw:start-glue-point="0" draw:end-shape="id351" draw:end-glue-point="2" svg:d="M102818 65440c0-1528 5825-509 5825-2040" svg:viewBox="0 0 5826 2041">
          <text:p/>
        </draw:connector>
        <draw:custom-shape draw:style-name="gr19" draw:text-style-name="P5" xml:id="id365" draw:id="id365" draw:layer="layout" svg:width="3.048cm" svg:height="2.54cm" svg:x="105.086cm" svg:y="65.439cm">
          <text:p text:style-name="P4"><text:span text:style-name="T5">Ataroth</text:span></text:p>
          <text:p text:style-name="P4"><text:span text:style-name="T4">1Ch 2:5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06.61cm" svg:y1="65.439cm" svg:x2="108.643cm" svg:y2="63.4cm" draw:start-shape="id365" draw:start-glue-point="0" draw:end-shape="id351" draw:end-glue-point="2" svg:d="M106610 65439c0-1528 2033-509 2033-2039" svg:viewBox="0 0 2034 2040">
          <text:p/>
        </draw:connector>
        <draw:custom-shape draw:style-name="gr7" draw:text-style-name="P6" xml:id="id366" draw:id="id366" draw:layer="layout" svg:width="3.048cm" svg:height="2.54cm" svg:x="109.116cm" svg:y="65.441cm">
          <text:p text:style-name="P4"><text:span text:style-name="T5">The house of Joab</text:span></text:p>
          <text:p text:style-name="P4"><text:span text:style-name="T4">1Ch 2:5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10.64cm" svg:y1="65.441cm" svg:x2="108.643cm" svg:y2="63.4cm" draw:start-shape="id366" draw:start-glue-point="0" draw:end-shape="id351" draw:end-glue-point="2" svg:d="M110640 65441c0-1530-1997-510-1997-2041" svg:viewBox="0 0 1998 2042">
          <text:p/>
        </draw:connector>
        <draw:custom-shape draw:style-name="gr37" draw:text-style-name="P8" xml:id="id367" draw:id="id367" draw:layer="layout" svg:width="3.556cm" svg:height="2.54cm" svg:x="112.615cm" svg:y="65.44cm">
          <text:p text:style-name="P4"><text:span text:style-name="T5">Half of the Manahethites</text:span></text:p>
          <text:p text:style-name="P4"><text:span text:style-name="T4">1Ch 2:5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8" xml:id="id346" draw:id="id346" draw:layer="layout" svg:width="3.048cm" svg:height="2.54cm" svg:x="116.617cm" svg:y="65.442cm">
          <text:p text:style-name="P4"><text:span text:style-name="T5">Zorites</text:span></text:p>
          <text:p text:style-name="P4"><text:span text:style-name="T4">Pre-captivity</text:span><text:span text:style-name="T21">*</text:span></text:p>
          <text:p text:style-name="P4"><text:span text:style-name="T4">1Ch 2:54</text:span></text:p>
          <text:p text:style-name="P4"><text:span text:style-name="T4">2Ch 11: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" draw:text-style-name="P3" draw:layer="layout" draw:type="curve" svg:x1="114.393cm" svg:y1="65.44cm" svg:x2="108.644cm" svg:y2="63.401cm" draw:start-shape="id367" draw:start-glue-point="0" svg:d="M114393 65440c0-1905-5749-886-5749-2039" svg:viewBox="0 0 5750 2040">
          <text:p/>
        </draw:connector>
        <draw:connector draw:style-name="gr15" draw:text-style-name="P3" draw:layer="layout" draw:type="curve" svg:x1="118.141cm" svg:y1="65.442cm" svg:x2="108.645cm" svg:y2="63.402cm" draw:start-shape="id346" draw:start-glue-point="0" svg:d="M118141 65442c0-1905-9496-885-9496-2040" svg:viewBox="0 0 9497 2041">
          <text:p/>
        </draw:connector>
        <draw:custom-shape draw:style-name="gr59" draw:text-style-name="P39" xml:id="id347" draw:id="id347" draw:layer="layout" svg:width="10.16cm" svg:height="10.16cm" svg:x="109.467cm" svg:y="75.885cm">
          <text:p text:style-name="P37"><text:span text:style-name="T34">Zorah, Zoreah, and Zareah are likely the same place known by different names signifying different periods of time (</text:span><text:span text:style-name="T18">H6881</text:span><text:span text:style-name="T34">).</text:span></text:p>
          <text:p text:style-name="P37"><text:span text:style-name="T34"/></text:p>
          <text:p text:style-name="P37"><text:span text:style-name="T34">Zoreah/Zorah &amp; Eshtaol were given to both Judah &amp; Dan</text:span></text:p>
          <text:p text:style-name="P37"><text:span text:style-name="T35">Jos 15:33, 19:41</text:span></text:p>
          <text:p text:style-name="P37"><text:span text:style-name="T34"/></text:p>
          <text:p text:style-name="P37"><text:span text:style-name="T34">Zorah, Zoreah, Zareah (Judah)</text:span></text:p>
          <text:p text:style-name="P37"><text:span text:style-name="T35">Jos 15:33, 2Ch 11:10, Neh 11:29</text:span></text:p>
          <text:p text:style-name="P37"><text:span text:style-name="T34"/></text:p>
          <text:p text:style-name="P38"><text:span text:style-name="T34">Zorah (Dan) excluding </text:span><text:span text:style-name="T18">2Ch 11:10</text:span></text:p>
          <text:p text:style-name="P37"><text:span text:style-name="T35">Jos 19:41, Jdg 13:2,25, 16:31, 18:2,8,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" xml:id="id368" draw:id="id368" draw:layer="layout" svg:width="3.099cm" svg:height="2.54cm" svg:x="97.487cm" svg:y="65.44cm">
          <text:p text:style-name="P4"><text:span text:style-name="T5">Beth-lehem</text:span></text:p>
          <text:p text:style-name="P4"><text:span text:style-name="T4">1Ch 2:5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99.036cm" svg:y1="65.44cm" svg:x2="108.644cm" svg:y2="63.401cm" draw:start-shape="id368" draw:start-glue-point="0" svg:d="M99036 65440c0-1905 9608-886 9608-2039" svg:viewBox="0 0 9609 2040">
          <text:p/>
        </draw:connector>
        <draw:connector draw:style-name="gr2" draw:text-style-name="P3" draw:layer="layout" draw:type="curve" svg:x1="129.62cm" svg:y1="35.577cm" svg:x2="129.605cm" svg:y2="34.916cm" draw:start-shape="id369" draw:start-glue-point="0" draw:end-shape="id370" draw:end-glue-point="2" svg:d="M129620 35577c0-495-15-165-15-661" svg:viewBox="0 0 16 662">
          <text:p/>
        </draw:connector>
        <draw:connector draw:style-name="gr2" draw:text-style-name="P3" draw:layer="layout" draw:type="curve" svg:x1="129.598cm" svg:y1="31.715cm" svg:x2="129.605cm" svg:y2="32.376cm" draw:start-shape="id371" draw:start-glue-point="2" draw:end-shape="id370" draw:end-glue-point="0" svg:d="M129598 31715c0 496 7 166 7 661" svg:viewBox="0 0 8 662">
          <text:p/>
        </draw:connector>
        <draw:connector draw:style-name="gr2" draw:text-style-name="P3" draw:layer="layout" draw:type="curve" svg:x1="133.997cm" svg:y1="31.766cm" svg:x2="144.497cm" svg:y2="33.874cm" draw:start-shape="id372" draw:start-glue-point="2" draw:end-shape="id373" draw:end-glue-point="0" svg:d="M133997 31766c0 1582 10500 529 10500 2108" svg:viewBox="0 0 10501 2109">
          <text:p/>
        </draw:connector>
        <draw:connector draw:style-name="gr2" draw:text-style-name="P3" draw:layer="layout" draw:type="curve" svg:x1="133.997cm" svg:y1="31.766cm" svg:x2="140.996cm" svg:y2="33.873cm" draw:start-shape="id372" draw:start-glue-point="2" draw:end-shape="id374" draw:end-glue-point="0" svg:d="M133997 31766c0 1581 6999 528 6999 2107" svg:viewBox="0 0 7000 2108">
          <text:p/>
        </draw:connector>
        <draw:connector draw:style-name="gr2" draw:text-style-name="P3" draw:layer="layout" draw:type="curve" svg:x1="133.996cm" svg:y1="27.365cm" svg:x2="129.598cm" svg:y2="29.175cm" draw:start-shape="id220" draw:start-glue-point="2" draw:end-shape="id371" draw:end-glue-point="0" svg:d="M133996 27365c0 1359-4398 454-4398 1810" svg:viewBox="0 0 4399 1811">
          <text:p/>
        </draw:connector>
        <draw:connector draw:style-name="gr2" draw:text-style-name="P3" draw:layer="layout" draw:type="curve" svg:x1="133.997cm" svg:y1="31.766cm" svg:x2="137.497cm" svg:y2="33.874cm" draw:start-shape="id372" draw:start-glue-point="2" draw:end-shape="id375" draw:end-glue-point="0" svg:d="M133997 31766c0 1582 3500 529 3500 2108" svg:viewBox="0 0 3501 2109">
          <text:p/>
        </draw:connector>
        <draw:connector draw:style-name="gr2" draw:text-style-name="P3" draw:layer="layout" draw:type="curve" svg:x1="133.997cm" svg:y1="31.766cm" svg:x2="133.997cm" svg:y2="33.874cm" draw:start-shape="id372" draw:start-glue-point="2" draw:end-shape="id376" draw:end-glue-point="0" svg:d="M133997 31766v2108" svg:viewBox="0 0 1 2109">
          <text:p/>
        </draw:connector>
        <draw:custom-shape draw:style-name="gr41" draw:text-style-name="P6" xml:id="id220" draw:id="id220" draw:layer="layout" svg:width="3.048cm" svg:height="2.692cm" svg:x="132.472cm" svg:y="24.673cm">
          <text:p text:style-name="P4"><text:span text:style-name="T5">Zerah</text:span></text:p>
          <text:p text:style-name="P4"><text:span text:style-name="T4">1Ch 2:4</text:span></text:p>
          <text:p text:style-name="P4"><text:span text:style-name="T4">Neh 11:24</text:span></text:p>
          <text:p text:style-name="P4"><text:span text:style-name="T14">Zarah</text:span></text:p>
          <text:p text:style-name="P4"><text:span text:style-name="T4">Gen 38: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74" draw:id="id374" draw:layer="layout" svg:width="3.048cm" svg:height="2.54cm" svg:x="139.472cm" svg:y="33.873cm">
          <text:p text:style-name="P4"><text:span text:style-name="T5">Calcol</text:span></text:p>
          <text:p text:style-name="P4"><text:span text:style-name="T4">1Ch 2:6</text:span></text:p>
          <text:p text:style-name="P4"><text:span text:style-name="T14">Chalcol</text:span><text:span text:style-name="T24">*</text:span></text:p>
          <text:p text:style-name="P4"><text:span text:style-name="T4">1Ki 4: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75" draw:id="id375" draw:layer="layout" svg:width="3.048cm" svg:height="2.54cm" svg:x="135.973cm" svg:y="33.874cm">
          <text:p text:style-name="P4"><text:span text:style-name="T5">Heman</text:span></text:p>
          <text:p text:style-name="P4"><text:span text:style-name="T4">1Ch 2:6</text:span></text:p>
          <text:p text:style-name="P4"><text:span text:style-name="T4">1Ki 4:31</text:span><text:span text:style-name="T21">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73" draw:id="id373" draw:layer="layout" svg:width="3.048cm" svg:height="2.54cm" svg:x="142.973cm" svg:y="33.874cm">
          <text:p text:style-name="P4"><text:span text:style-name="T5">Dara</text:span></text:p>
          <text:p text:style-name="P4"><text:span text:style-name="T4">1Ch 2:6</text:span></text:p>
          <text:p text:style-name="P4"><text:span text:style-name="T14">Darda</text:span><text:span text:style-name="T24">*</text:span></text:p>
          <text:p text:style-name="P4"><text:span text:style-name="T4">1Ki 4: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76" draw:id="id376" draw:layer="layout" svg:width="3.048cm" svg:height="2.54cm" svg:x="132.473cm" svg:y="33.874cm">
          <text:p text:style-name="P4"><text:span text:style-name="T5">Ethan</text:span></text:p>
          <text:p text:style-name="P4"><text:span text:style-name="T4">1Ch 2:6</text:span></text:p>
          <text:p text:style-name="P4"><text:span text:style-name="T4">1Ki 4:31</text:span><text:span text:style-name="T21">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71" draw:id="id371" draw:layer="layout" svg:width="3.048cm" svg:height="2.54cm" svg:x="128.074cm" svg:y="29.175cm">
          <text:p text:style-name="P4"><text:span text:style-name="T5">Zimri</text:span></text:p>
          <text:p text:style-name="P4"><text:span text:style-name="T4">1Ch 2:6</text:span></text:p>
          <text:p text:style-name="P9"><text:span text:style-name="T9">Zabdi</text:span></text:p>
          <text:p text:style-name="P9"><text:span text:style-name="T4">Jos 7:1,17,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70" draw:id="id370" draw:layer="layout" svg:width="3.048cm" svg:height="2.54cm" svg:x="128.081cm" svg:y="32.376cm">
          <text:p text:style-name="P4"><text:span text:style-name="T5">Carmi</text:span></text:p>
          <text:p text:style-name="P4"><text:span text:style-name="T4">Jos 7:1,18</text:span></text:p>
          <text:p text:style-name="P4"><text:span text:style-name="T4">1Ch 2:7, 4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69" draw:id="id369" draw:layer="layout" svg:width="3.048cm" svg:height="2.54cm" svg:x="128.096cm" svg:y="35.577cm">
          <text:p text:style-name="P4"><text:span text:style-name="T5">Achar</text:span></text:p>
          <text:p text:style-name="P4"><text:span text:style-name="T4">1Ch 2:7</text:span></text:p>
          <text:p text:style-name="P4"><text:span text:style-name="T14">Achan</text:span></text:p>
          <text:p text:style-name="P4"><text:span text:style-name="T4">Jos 7:1,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77" draw:id="id377" draw:layer="layout" svg:width="3.048cm" svg:height="2.54cm" svg:x="132.482cm" svg:y="37.577cm">
          <text:p text:style-name="P4"><text:span text:style-name="T5">Azariah</text:span></text:p>
          <text:p text:style-name="P4"><text:span text:style-name="T4">1Ch 2: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34.006cm" svg:y1="37.577cm" svg:x2="133.997cm" svg:y2="36.414cm" draw:start-shape="id377" draw:start-glue-point="0" draw:end-shape="id376" draw:end-glue-point="2" svg:d="M134006 37577c0-871-9-290-9-1163" svg:viewBox="0 0 10 1164">
          <text:p/>
        </draw:connector>
        <draw:custom-shape draw:style-name="gr41" draw:text-style-name="P6" xml:id="id372" draw:id="id372" draw:layer="layout" svg:width="3.048cm" svg:height="2.692cm" svg:x="132.473cm" svg:y="29.074cm">
          <text:p text:style-name="P4"><text:span text:style-name="T5">Mahol</text:span><text:span text:style-name="T25">*</text:span></text:p>
          <text:p text:style-name="P4"><text:span text:style-name="T4">1Ki 4: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33.996cm" svg:y1="27.365cm" svg:x2="133.997cm" svg:y2="29.074cm" draw:start-shape="id220" draw:start-glue-point="2" draw:end-shape="id372" draw:end-glue-point="0" svg:d="M133996 27365c0 1282 1 428 1 1709" svg:viewBox="0 0 2 1710">
          <text:p/>
        </draw:connector>
        <draw:custom-shape draw:style-name="gr42" draw:text-style-name="P41" draw:layer="layout" svg:width="16.185cm" svg:height="12.905cm" svg:x="131.528cm" svg:y="24.145cm">
          <text:p text:style-name="P40"><text:span text:style-name="T36">The connection between </text:span><text:span text:style-name="T37">1Ki 4:31</text:span><text:span text:style-name="T36"> and the sons of Zerah</text:span></text:p>
          <text:p text:style-name="P40"><text:span text:style-name="T36">is not irrefutable but the resemblance is notable</text:span></text:p>
          <text:p text:style-name="P40"><text:span text:style-name="T36"/></text:p>
          <text:p text:style-name="P40"><text:span text:style-name="T36">Ezrahite (H250) &amp; Zarah (H2226) are in the same cognate group</text:span></text:p>
          <text:p text:style-name="P40"><text:span text:style-name="T36">Ethan (H387) is the same</text:span></text:p>
          <text:p text:style-name="P40"><text:span text:style-name="T36">Heman (H1968) is the same</text:span></text:p>
          <text:p text:style-name="P40"><text:span text:style-name="T18">Calcol &amp; Chalcol (</text:span><text:span text:style-name="T36">H3633) are the same</text:span></text:p>
          <text:p text:style-name="P40"><text:span text:style-name="T36">Dara (H1873) &amp; Darda (H1862) are in the same cognate group</text:span></text:p>
          <text:p text:style-name="P40"><text:span text:style-name="T36"/></text:p>
          <text:p text:style-name="P40"><text:span text:style-name="T36">It seems far more likely that the superscripts</text:span></text:p>
          <text:p text:style-name="P40"><text:span text:style-name="T36">For </text:span><text:span text:style-name="T37">Psalms 88</text:span><text:span text:style-name="T36"> &amp; </text:span><text:span text:style-name="T37">89</text:span><text:span text:style-name="T36"> are referring to the Levites</text:span></text:p>
          <text:p text:style-name="P40"><text:span text:style-name="T36">Ethan &amp; Heman (</text:span><text:span text:style-name="T37">1Ch 15:17</text:span><text:span text:style-name="T36">) and not these me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69.444cm" svg:y1="32.6cm" svg:x2="48.331cm" svg:y2="30.638cm" draw:start-shape="id250" draw:start-glue-point="0" draw:end-shape="id272" draw:end-glue-point="2" svg:d="M69444 32600c0-1470-21113-489-21113-1962" svg:viewBox="0 0 21114 1963">
          <text:p/>
        </draw:connector>
        <draw:connector draw:style-name="gr9" draw:text-style-name="P3" draw:layer="layout" draw:type="curve" svg:x1="38.124cm" svg:y1="62.1cm" svg:x2="59.704cm" svg:y2="62.138cm" draw:start-shape="id289" draw:start-glue-point="0" draw:end-shape="id271" draw:end-glue-point="0" svg:d="M38124 62100c0-751 21580-770 21580 38" svg:viewBox="0 0 21581 605">
          <text:p/>
        </draw:connector>
        <draw:custom-shape draw:style-name="gr19" draw:text-style-name="P5" xml:id="id378" draw:id="id378" draw:layer="layout" svg:width="3.048cm" svg:height="2.54cm" svg:x="100.916cm" svg:y="41.631cm">
          <text:p text:style-name="P4"><text:span text:style-name="T5">Jahdai</text:span></text:p>
          <text:p text:style-name="P4"><text:span text:style-name="T4">1Ch 2:4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79" draw:id="id379" draw:layer="layout" svg:width="3.048cm" svg:height="2.54cm" svg:x="92.417cm" svg:y="47.232cm">
          <text:p text:style-name="P4"><text:span text:style-name="T5">Regem</text:span></text:p>
          <text:p text:style-name="P4"><text:span text:style-name="T4">1Ch 2:4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80" draw:id="id380" draw:layer="layout" svg:width="3.048cm" svg:height="2.54cm" svg:x="95.818cm" svg:y="47.233cm">
          <text:p text:style-name="P4"><text:span text:style-name="T5">Jotham</text:span></text:p>
          <text:p text:style-name="P4"><text:span text:style-name="T4">1Ch 2:4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81" draw:id="id381" draw:layer="layout" svg:width="3.048cm" svg:height="2.54cm" svg:x="99.219cm" svg:y="47.234cm">
          <text:p text:style-name="P4"><text:span text:style-name="T5">Geshan</text:span></text:p>
          <text:p text:style-name="P4"><text:span text:style-name="T4">1Ch 2:4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82" draw:id="id382" draw:layer="layout" svg:width="3.048cm" svg:height="2.54cm" svg:x="102.62cm" svg:y="47.235cm">
          <text:p text:style-name="P4"><text:span text:style-name="T5">Pelet</text:span></text:p>
          <text:p text:style-name="P4"><text:span text:style-name="T4">1Ch 2:4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83" draw:id="id383" draw:layer="layout" svg:width="3.048cm" svg:height="2.54cm" svg:x="106.02cm" svg:y="47.235cm">
          <text:p text:style-name="P4"><text:span text:style-name="T5">Ephah</text:span></text:p>
          <text:p text:style-name="P4"><text:span text:style-name="T4">1Ch 2:4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84" draw:id="id384" draw:layer="layout" svg:width="3.048cm" svg:height="2.54cm" svg:x="109.421cm" svg:y="47.236cm">
          <text:p text:style-name="P4"><text:span text:style-name="T5">Shaaph</text:span></text:p>
          <text:p text:style-name="P4"><text:span text:style-name="T4">1Ch 2:4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02.44cm" svg:y1="44.171cm" svg:x2="93.941cm" svg:y2="47.232cm" draw:start-shape="id378" draw:start-glue-point="2" draw:end-shape="id379" draw:end-glue-point="0" svg:d="M102440 44171c0 2296-8499 766-8499 3061" svg:viewBox="0 0 8500 3062">
          <text:p/>
        </draw:connector>
        <draw:connector draw:style-name="gr2" draw:text-style-name="P3" draw:layer="layout" draw:type="curve" svg:x1="102.44cm" svg:y1="44.171cm" svg:x2="97.342cm" svg:y2="47.233cm" draw:start-shape="id378" draw:start-glue-point="2" draw:end-shape="id380" draw:end-glue-point="0" svg:d="M102440 44171c0 2298-5098 767-5098 3062" svg:viewBox="0 0 5099 3063">
          <text:p/>
        </draw:connector>
        <draw:connector draw:style-name="gr2" draw:text-style-name="P3" draw:layer="layout" draw:type="curve" svg:x1="102.44cm" svg:y1="44.171cm" svg:x2="100.743cm" svg:y2="47.234cm" draw:start-shape="id378" draw:start-glue-point="2" draw:end-shape="id381" draw:end-glue-point="0" svg:d="M102440 44171c0 2298-1697 767-1697 3063" svg:viewBox="0 0 1698 3064">
          <text:p/>
        </draw:connector>
        <draw:connector draw:style-name="gr2" draw:text-style-name="P3" draw:layer="layout" draw:type="curve" svg:x1="102.44cm" svg:y1="44.171cm" svg:x2="104.144cm" svg:y2="47.235cm" draw:start-shape="id378" draw:start-glue-point="2" draw:end-shape="id382" draw:end-glue-point="0" svg:d="M102440 44171c0 2299 1704 768 1704 3064" svg:viewBox="0 0 1705 3065">
          <text:p/>
        </draw:connector>
        <draw:connector draw:style-name="gr2" draw:text-style-name="P3" draw:layer="layout" draw:type="curve" svg:x1="102.44cm" svg:y1="44.171cm" svg:x2="107.544cm" svg:y2="47.235cm" draw:start-shape="id378" draw:start-glue-point="2" draw:end-shape="id383" draw:end-glue-point="0" svg:d="M102440 44171c0 2299 5104 768 5104 3064" svg:viewBox="0 0 5105 3065">
          <text:p/>
        </draw:connector>
        <draw:connector draw:style-name="gr2" draw:text-style-name="P3" draw:layer="layout" draw:type="curve" svg:x1="102.44cm" svg:y1="44.171cm" svg:x2="110.945cm" svg:y2="47.236cm" draw:start-shape="id378" draw:start-glue-point="2" draw:end-shape="id384" draw:end-glue-point="0" svg:d="M102440 44171c0 2299 8505 767 8505 3065" svg:viewBox="0 0 8506 3066">
          <text:p/>
        </draw:connector>
        <draw:connector draw:style-name="gr6" draw:text-style-name="P3" draw:layer="layout" draw:type="curve" svg:x1="110.029cm" svg:y1="35.557cm" svg:x2="113.631cm" svg:y2="38.158cm" draw:start-shape="id269" draw:start-glue-point="2" draw:end-shape="id385" draw:end-glue-point="0" svg:d="M110029 35557c0 1951 3602 651 3602 2601" svg:viewBox="0 0 3603 2602">
          <text:p/>
        </draw:connector>
        <draw:connector draw:style-name="gr6" draw:text-style-name="P3" draw:layer="layout" draw:type="curve" svg:x1="110.029cm" svg:y1="35.557cm" svg:x2="110.03cm" svg:y2="38.157cm" draw:start-shape="id269" draw:start-glue-point="2" draw:end-shape="id386" draw:end-glue-point="0" svg:d="M110029 35557c0 1951 1 652 1 2600" svg:viewBox="0 0 2 2601">
          <text:p/>
        </draw:connector>
        <draw:custom-shape draw:style-name="gr8" draw:text-style-name="P7" xml:id="id269" draw:id="id269" draw:layer="layout" svg:width="3.048cm" svg:height="2.54cm" svg:x="108.505cm" svg:y="33.017cm">
          <text:p text:style-name="P4"><text:span text:style-name="T5">Maachah</text:span></text:p>
          <text:p text:style-name="P4"><text:span text:style-name="T8">concubine</text:span></text:p>
          <text:p text:style-name="P4"><text:span text:style-name="T4">1Ch 2:4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86" draw:id="id386" draw:layer="layout" svg:width="3.048cm" svg:height="2.54cm" svg:x="108.506cm" svg:y="38.157cm">
          <text:p text:style-name="P4"><text:span text:style-name="T5">Sheber</text:span></text:p>
          <text:p text:style-name="P4"><text:span text:style-name="T4">1Ch 2:4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85" draw:id="id385" draw:layer="layout" svg:width="3.048cm" svg:height="2.54cm" svg:x="112.107cm" svg:y="38.158cm">
          <text:p text:style-name="P4"><text:span text:style-name="T5">Tirhanah</text:span></text:p>
          <text:p text:style-name="P4"><text:span text:style-name="T4">1Ch 2:4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87" draw:id="id387" draw:layer="layout" svg:width="3.048cm" svg:height="2.54cm" svg:x="115.707cm" svg:y="38.158cm">
          <text:p text:style-name="P4"><text:span text:style-name="T5">Shaaph</text:span></text:p>
          <text:p text:style-name="P4"><text:span text:style-name="T4">1Ch 2:4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88" draw:id="id388" draw:layer="layout" svg:width="3.048cm" svg:height="2.54cm" svg:x="119.308cm" svg:y="38.159cm">
          <text:p text:style-name="P4"><text:span text:style-name="T5">Sheva</text:span></text:p>
          <text:p text:style-name="P4"><text:span text:style-name="T4">1Ch 2:4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110.029cm" svg:y1="35.658cm" svg:x2="117.231cm" svg:y2="38.158cm" draw:end-shape="id387" draw:end-glue-point="0" svg:d="M110029 35658c0 1500 7202 250 7202 2500" svg:viewBox="0 0 7203 2501">
          <text:p/>
        </draw:connector>
        <draw:connector draw:style-name="gr6" draw:text-style-name="P3" draw:layer="layout" draw:type="curve" svg:x1="110.029cm" svg:y1="35.658cm" svg:x2="120.832cm" svg:y2="38.159cm" draw:end-shape="id388" draw:end-glue-point="0" svg:d="M110029 35658c0 1500 10803 250 10803 2501" svg:viewBox="0 0 10804 2502">
          <text:p/>
        </draw:connector>
        <draw:custom-shape draw:style-name="gr8" draw:text-style-name="P7" xml:id="id389" draw:id="id389" draw:layer="layout" svg:width="3.048cm" svg:height="2.54cm" svg:x="122.909cm" svg:y="38.16cm">
          <text:p text:style-name="P4"><text:span text:style-name="T5">Achsah</text:span></text:p>
          <text:p text:style-name="P4"><text:span text:style-name="T4">1Ch 2:4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110.03cm" svg:y1="35.659cm" svg:x2="124.433cm" svg:y2="38.16cm" draw:end-shape="id389" draw:end-glue-point="0" svg:d="M110030 35659c0 1500 14403 250 14403 2501" svg:viewBox="0 0 14404 2502">
          <text:p/>
        </draw:connector>
        <draw:custom-shape draw:style-name="gr43" draw:text-style-name="P11" xml:id="id390" draw:id="id390" draw:layer="layout" svg:width="3.404cm" svg:height="2.54cm" svg:x="115.53cm" svg:y="41.786cm">
          <text:p text:style-name="P4"><text:span text:style-name="T5">Madmannah</text:span></text:p>
          <text:p text:style-name="P4"><text:span text:style-name="T4">1Ch 2:49</text:span></text:p>
          <text:p text:style-name="P4"><text:span text:style-name="T4">Jos 15:20,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1" draw:text-style-name="P3" draw:layer="layout" draw:type="curve" svg:x1="117.232cm" svg:y1="41.786cm" svg:x2="117.231cm" svg:y2="40.698cm" draw:start-shape="id390" draw:start-glue-point="0" draw:end-shape="id387" draw:end-glue-point="2" svg:d="M117232 41786c0-814-1-271-1-1088" svg:viewBox="0 0 2 1089">
          <text:p/>
        </draw:connector>
        <draw:custom-shape draw:style-name="gr44" draw:text-style-name="P11" xml:id="id391" draw:id="id391" draw:layer="layout" svg:width="3.2cm" svg:height="2.54cm" svg:x="119.235cm" svg:y="41.78cm">
          <text:p text:style-name="P4"><text:span text:style-name="T5">Machbenah</text:span></text:p>
          <text:p text:style-name="P4"><text:span text:style-name="T4">1Ch 2:4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6" draw:text-style-name="P11" xml:id="id392" draw:id="id392" draw:layer="layout" svg:width="3.251cm" svg:height="2.54cm" svg:x="122.978cm" svg:y="41.781cm">
          <text:p text:style-name="P4"><text:span text:style-name="T5">Gibea</text:span></text:p>
          <text:p text:style-name="P4"><text:span text:style-name="T4">1Ch 2:49</text:span></text:p>
          <text:p text:style-name="P4"><text:span text:style-name="T4">Jos 15:5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1" draw:text-style-name="P3" draw:layer="layout" draw:type="curve" svg:x1="120.835cm" svg:y1="41.78cm" svg:x2="120.832cm" svg:y2="40.699cm" draw:start-shape="id391" draw:start-glue-point="0" draw:end-shape="id388" draw:end-glue-point="2" svg:d="M120835 41780c0-810-3-270-3-1081" svg:viewBox="0 0 4 1082">
          <text:p/>
        </draw:connector>
        <draw:connector draw:style-name="gr21" draw:text-style-name="P3" draw:layer="layout" draw:type="curve" svg:x1="124.603cm" svg:y1="41.781cm" svg:x2="120.832cm" svg:y2="40.699cm" draw:start-shape="id392" draw:start-glue-point="0" draw:end-shape="id388" draw:end-glue-point="2" svg:d="M124603 41781c0-810-3771-269-3771-1082" svg:viewBox="0 0 3772 1083">
          <text:p/>
        </draw:connector>
        <draw:custom-shape draw:style-name="gr7" draw:text-style-name="P6" xml:id="id393" draw:id="id393" draw:layer="layout" svg:width="3.048cm" svg:height="2.54cm" svg:x="131.693cm" svg:y="70.31cm">
          <text:p text:style-name="P4"><text:span text:style-name="T5">The house of Rechab</text:span></text:p>
          <text:p text:style-name="P4"><text:span text:style-name="T4">1Ch 2:5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45" draw:text-style-name="P3" draw:layer="layout" draw:type="curve" svg:x1="122.041cm" svg:y1="67.981cm" svg:x2="133.217cm" svg:y2="70.31cm" draw:start-shape="id245" draw:start-glue-point="2" draw:end-shape="id393" draw:end-glue-point="0" svg:d="M122041 67981c0 1747 11176 583 11176 2329" svg:viewBox="0 0 11177 2330">
          <text:p/>
        </draw:connector>
        <draw:custom-shape draw:style-name="gr46" draw:text-style-name="P11" xml:id="id214" draw:id="id214" draw:layer="layout" svg:width="3.048cm" svg:height="2.54cm" svg:x="127.86cm" svg:y="65.439cm">
          <text:p text:style-name="P4"><text:span text:style-name="T5">Jabez</text:span></text:p>
          <text:p text:style-name="P4"><text:span text:style-name="T4">1Ch 2:5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3" draw:layer="layout" draw:type="curve" svg:x1="102.436cm" svg:y1="40.676cm" svg:x2="102.44cm" svg:y2="41.631cm" draw:start-shape="id265" draw:start-glue-point="2" draw:end-shape="id378" draw:end-glue-point="0" svg:d="M102436 40676c0 717 4 240 4 955" svg:viewBox="0 0 5 956">
          <text:p/>
        </draw:connector>
        <draw:connector draw:style-name="gr2" draw:text-style-name="P3" draw:layer="layout" draw:type="curve" svg:x1="122.041cm" svg:y1="65.441cm" svg:x2="108.644cm" svg:y2="63.402cm" draw:start-shape="id245" draw:start-glue-point="0" svg:d="M122041 65441c0-1905-13397-886-13397-2039" svg:viewBox="0 0 13398 2040">
          <text:p/>
        </draw:connector>
        <draw:connector draw:style-name="gr2" draw:text-style-name="P3" draw:layer="layout" draw:type="curve" svg:x1="92.738cm" svg:y1="54.861cm" svg:x2="87.736cm" svg:y2="40.799cm" draw:start-shape="id349" draw:start-glue-point="0" draw:end-shape="id344" draw:end-glue-point="2" svg:d="M92738 54861c0-10545-5002-3514-5002-14062" svg:viewBox="0 0 5003 14063">
          <text:p/>
        </draw:connector>
        <draw:custom-shape draw:style-name="gr60" draw:text-style-name="P43" draw:layer="layout" svg:width="3.365cm" svg:height="8.661cm" svg:x="39.876cm" svg:y="61.97cm">
          <text:p text:style-name="P42"><text:span text:style-name="T36">We can’t confirm that Elihu is David’s sibling </text:span><text:span text:style-name="T37">nor can we confirm that Elihu is another name for Eliab as some have supposed</text:span><text:span text:style-name="T36">. The Bible does tell us that Jesse had </text:span><text:span text:style-name="T37">eight</text:span><text:span text:style-name="T36"> son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" draw:text-style-name="P43" draw:layer="layout" svg:width="3.409cm" svg:height="7.657cm" svg:x="50.726cm" svg:y="23.167cm">
          <text:p text:style-name="P42"><text:span text:style-name="T36">Abiah could be the unnamed mother in v9, the unnamed daughter of Machir in v21, or a third wife as is supposed he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" draw:text-style-name="P45" draw:layer="layout" svg:width="11.198cm" svg:height="2.918cm" svg:x="31.176cm" svg:y="27.936cm">
          <text:p text:style-name="P44"><text:span text:style-name="T36">As was customary, the</text:span></text:p>
          <text:p text:style-name="P44"><text:span text:style-name="T36">city Gilead was likely</text:span></text:p>
          <text:p text:style-name="P44"><text:span text:style-name="T36">named after the man</text:span></text:p>
          <text:p text:style-name="P44"><text:span text:style-name="T36">Gilead but we can’t</text:span></text:p>
          <text:p text:style-name="P44"><text:span text:style-name="T36">confirm t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47" draw:layer="layout" svg:width="12.238cm" svg:height="2.848cm" svg:x="118.811cm" svg:y="70.187cm">
          <text:p text:style-name="P46"><text:span text:style-name="T36">Keni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" draw:text-style-name="P3" draw:layer="layout" svg:width="4.612cm" svg:height="3.651cm" svg:x="67.114cm" svg:y="32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24.523cm" svg:y1="66.23cm" svg:x2="24.525cm" svg:y2="67.801cm" draw:start-shape="id285" draw:start-glue-point="2" draw:end-shape="id394" draw:end-glue-point="0" svg:d="M24523 66230c0 1179 2 394 2 1571" svg:viewBox="0 0 3 1572">
          <text:p/>
        </draw:connector>
        <draw:custom-shape draw:style-name="gr52" draw:text-style-name="P6" xml:id="id394" draw:id="id394" draw:layer="layout" svg:width="3.048cm" svg:height="2.868cm" svg:x="23.001cm" svg:y="67.801cm">
          <text:p text:style-name="P4"><text:span text:style-name="T9">Jonathan</text:span></text:p>
          <text:p text:style-name="P4"><text:span text:style-name="T4">2Sa 21:21</text:span></text:p>
          <text:p text:style-name="P4"><text:span text:style-name="T4">1Ch 20: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31" xml:id="id395" draw:id="id395" draw:layer="layout" svg:width="3.048cm" svg:height="2.868cm" svg:x="26.702cm" svg:y="67.802cm">
          <text:p text:style-name="P30"><text:span text:style-name="T28">Jonadab</text:span></text:p>
          <text:p text:style-name="P30"><text:span text:style-name="T29">2Sa 13:3,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24.523cm" svg:y1="66.23cm" svg:x2="28.226cm" svg:y2="67.802cm" draw:start-shape="id285" draw:start-glue-point="2" draw:end-shape="id395" draw:end-glue-point="0" svg:d="M24523 66230c0 1179 3703 393 3703 1572" svg:viewBox="0 0 3704 1573">
          <text:p/>
        </draw:connector>
        <draw:custom-shape draw:style-name="gr62" draw:text-style-name="P49" draw:layer="layout" svg:width="4.906cm" svg:height="6.032cm" svg:x="106.166cm" svg:y="68.79cm">
          <text:p text:style-name="P48"><text:span text:style-name="T36">There is also a Bethlehem in Zebulun (</text:span><text:span text:style-name="T37">Jos 19:10,15</text:span><text:span text:style-name="T36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239" draw:id="id239" draw:layer="layout" svg:width="3.048cm" svg:height="2.54cm" svg:x="76.352cm" svg:y="6.295cm">
          <text:p text:style-name="P4"><text:span text:style-name="T5">Bilhah</text:span></text:p>
          <text:p text:style-name="P4"><text:span text:style-name="T4">Gen 30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396" draw:id="id396" draw:layer="layout" svg:width="3.048cm" svg:height="2.54cm" svg:x="82.114cm" svg:y="73.967cm">
          <text:p text:style-name="P4"><text:span text:style-name="T5">Shemaiah</text:span></text:p>
          <text:p text:style-name="P4"><text:span text:style-name="T4">Jer 26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draw:line-skew="1.179cm" svg:x1="83.638cm" svg:y1="73.967cm" svg:x2="92.74cm" svg:y2="72.313cm" draw:start-shape="id396" draw:start-glue-point="0" draw:end-shape="id397" draw:end-glue-point="3" svg:d="M83638 73967c0-1537 9102-711 9102-1654" svg:viewBox="0 0 9103 1655">
          <text:p/>
        </draw:connector>
        <draw:custom-shape draw:style-name="gr7" draw:text-style-name="P6" xml:id="id398" draw:id="id398" draw:layer="layout" svg:width="3.048cm" svg:height="2.54cm" svg:x="74.514cm" svg:y="73.967cm">
          <text:p text:style-name="P4"><text:span text:style-name="T5">Abinadab</text:span></text:p>
          <text:p text:style-name="P4"><text:span text:style-name="T4">1Sa 7:1,2</text:span></text:p>
          <text:p text:style-name="P4"><text:span text:style-name="T4">2Sa 6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draw:line-skew="0.912cm" svg:x1="76.038cm" svg:y1="73.967cm" svg:x2="92.74cm" svg:y2="72.313cm" draw:start-shape="id398" draw:start-glue-point="0" draw:end-shape="id397" draw:end-glue-point="3" svg:d="M76038 73967c0-1938 16702-1111 16702-1654" svg:viewBox="0 0 16703 1655">
          <text:p/>
        </draw:connector>
        <draw:custom-shape draw:style-name="gr7" draw:text-style-name="P6" xml:id="id399" draw:id="id399" draw:layer="layout" svg:width="3.048cm" svg:height="2.54cm" svg:x="70.814cm" svg:y="77.967cm">
          <text:p text:style-name="P4"><text:span text:style-name="T5">Eleazar</text:span></text:p>
          <text:p text:style-name="P4"><text:span text:style-name="T4">1Sa 7:1,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3" draw:text-style-name="P3" draw:layer="layout" draw:type="curve" svg:x1="72.338cm" svg:y1="77.967cm" svg:x2="76.038cm" svg:y2="76.507cm" draw:start-shape="id399" draw:start-glue-point="0" draw:end-shape="id398" draw:end-glue-point="2" svg:d="M72338 77967c0-1093 3700-364 3700-1460" svg:viewBox="0 0 3701 1461">
          <text:p/>
        </draw:connector>
        <draw:custom-shape draw:style-name="gr7" draw:text-style-name="P6" xml:id="id400" draw:id="id400" draw:layer="layout" svg:width="3.048cm" svg:height="2.54cm" svg:x="74.514cm" svg:y="77.967cm">
          <text:p text:style-name="P4"><text:span text:style-name="T5">Uzzah</text:span></text:p>
          <text:p text:style-name="P9"><text:span text:style-name="T4">2Sa 6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401" draw:id="id401" draw:layer="layout" svg:width="3.048cm" svg:height="2.54cm" svg:x="78.114cm" svg:y="77.967cm">
          <text:p text:style-name="P4"><text:span text:style-name="T5">Ahio</text:span></text:p>
          <text:p text:style-name="P9"><text:span text:style-name="T4">2Sa 6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3" draw:text-style-name="P3" draw:layer="layout" draw:type="curve" svg:x1="76.038cm" svg:y1="77.967cm" svg:x2="76.038cm" svg:y2="76.507cm" draw:start-shape="id400" draw:start-glue-point="0" draw:end-shape="id398" draw:end-glue-point="2" svg:d="M76038 77967v-1460" svg:viewBox="0 0 1 1461">
          <text:p/>
        </draw:connector>
        <draw:connector draw:style-name="gr23" draw:text-style-name="P3" draw:layer="layout" draw:type="curve" svg:x1="79.638cm" svg:y1="77.967cm" svg:x2="76.038cm" svg:y2="76.507cm" draw:start-shape="id401" draw:start-glue-point="0" draw:end-shape="id398" draw:end-glue-point="2" svg:d="M79638 77967c0-1093-3600-364-3600-1460" svg:viewBox="0 0 3601 1461">
          <text:p/>
        </draw:connector>
        <draw:custom-shape draw:style-name="gr7" draw:text-style-name="P6" xml:id="id402" draw:id="id402" draw:layer="layout" svg:width="3.048cm" svg:height="2.54cm" svg:x="82.114cm" svg:y="77.967cm">
          <text:p text:style-name="P4"><text:span text:style-name="T5">Urijah</text:span></text:p>
          <text:p text:style-name="P4"><text:span text:style-name="T4">Jer 26: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83.638cm" svg:y1="76.507cm" svg:x2="83.638cm" svg:y2="77.967cm" draw:start-shape="id396" draw:start-glue-point="2" draw:end-shape="id402" draw:end-glue-point="0" svg:d="M83638 76507v1460" svg:viewBox="0 0 1 1461">
          <text:p/>
        </draw:connector>
        <draw:custom-shape draw:style-name="gr7" draw:text-style-name="P6" xml:id="id403" draw:id="id403" draw:layer="layout" svg:width="3.048cm" svg:height="2.54cm" svg:x="67.613cm" svg:y="70.26cm">
          <text:p text:style-name="P4"><text:span text:style-name="T5">Jahath</text:span></text:p>
          <text:p text:style-name="P4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404" draw:id="id404" draw:layer="layout" svg:width="3.048cm" svg:height="2.54cm" svg:x="65.618cm" svg:y="73.886cm">
          <text:p text:style-name="P4"><text:span text:style-name="T5">Ahumai</text:span></text:p>
          <text:p text:style-name="P4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405" draw:id="id405" draw:layer="layout" svg:width="3.048cm" svg:height="2.54cm" svg:x="69.718cm" svg:y="73.886cm">
          <text:p text:style-name="P4"><text:span text:style-name="T5">Lahad</text:span></text:p>
          <text:p text:style-name="P4"><text:span text:style-name="T4">1Ch 4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69.137cm" svg:y1="70.26cm" svg:x2="69.137cm" svg:y2="69.5cm" draw:start-shape="id403" draw:start-glue-point="0" draw:end-shape="id353" draw:end-glue-point="2" svg:d="M69137 70260v-760" svg:viewBox="0 0 1 761">
          <text:p/>
        </draw:connector>
        <draw:connector draw:style-name="gr2" draw:text-style-name="P3" draw:layer="layout" draw:type="curve" svg:x1="67.142cm" svg:y1="73.886cm" svg:x2="69.137cm" svg:y2="72.8cm" draw:start-shape="id404" draw:start-glue-point="0" draw:end-shape="id403" draw:end-glue-point="2" svg:d="M67142 73886c0-813 1995-270 1995-1086" svg:viewBox="0 0 1996 1087">
          <text:p/>
        </draw:connector>
        <draw:connector draw:style-name="gr2" draw:text-style-name="P3" draw:layer="layout" draw:type="curve" svg:x1="71.242cm" svg:y1="73.886cm" svg:x2="69.137cm" svg:y2="72.8cm" draw:start-shape="id405" draw:start-glue-point="0" draw:end-shape="id403" draw:end-glue-point="2" svg:d="M71242 73886c0-813-2105-270-2105-1086" svg:viewBox="0 0 2106 1087">
          <text:p/>
        </draw:connector>
        <draw:custom-shape draw:style-name="gr7" draw:text-style-name="P6" xml:id="id406" draw:id="id406" draw:layer="layout" svg:width="3.048cm" svg:height="2.54cm" svg:x="137.582cm" svg:y="60.857cm">
          <text:p text:style-name="P4"><text:span text:style-name="T5">Ezer</text:span></text:p>
          <text:p text:style-name="P4"><text:span text:style-name="T4">1Ch 4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407" draw:id="id407" draw:layer="layout" svg:width="3.048cm" svg:height="2.54cm" svg:x="141.582cm" svg:y="60.857cm">
          <text:p text:style-name="P4"><text:span text:style-name="T5">Etam</text:span></text:p>
          <text:p text:style-name="P4"><text:span text:style-name="T4">1Ch 4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92.738cm" svg:y1="57.401cm" svg:x2="139.106cm" svg:y2="60.857cm" draw:start-shape="id349" draw:start-glue-point="2" draw:end-shape="id406" draw:end-glue-point="0" svg:d="M92738 57401c0 2593 46368 866 46368 3456" svg:viewBox="0 0 46369 3457">
          <text:p/>
        </draw:connector>
        <draw:connector draw:style-name="gr2" draw:text-style-name="P3" draw:layer="layout" draw:type="curve" svg:x1="92.738cm" svg:y1="57.401cm" svg:x2="143.106cm" svg:y2="60.857cm" draw:start-shape="id349" draw:start-glue-point="2" draw:end-shape="id407" draw:end-glue-point="0" svg:d="M92738 57401c0 2593 50368 866 50368 3456" svg:viewBox="0 0 50369 3457">
          <text:p/>
        </draw:connector>
        <draw:custom-shape draw:style-name="gr7" draw:text-style-name="P6" xml:id="id408" draw:id="id408" draw:layer="layout" svg:width="3.048cm" svg:height="2.54cm" svg:x="137.61cm" svg:y="64.657cm">
          <text:p text:style-name="P4"><text:span text:style-name="T5">Chelub</text:span></text:p>
          <text:p text:style-name="P4"><text:span text:style-name="T4">1Ch 4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39.134cm" svg:y1="64.657cm" svg:x2="139.106cm" svg:y2="63.397cm" draw:start-shape="id408" draw:start-glue-point="0" draw:end-shape="id406" draw:end-glue-point="2" svg:d="M139134 64657c0-943-28-314-28-1260" svg:viewBox="0 0 29 1261">
          <text:p/>
        </draw:connector>
        <draw:custom-shape draw:style-name="gr7" draw:text-style-name="P6" xml:id="id409" draw:id="id409" draw:layer="layout" svg:width="3.048cm" svg:height="2.54cm" svg:x="141.482cm" svg:y="64.657cm">
          <text:p text:style-name="P4"><text:span text:style-name="T5">Hushah</text:span></text:p>
          <text:p text:style-name="P4"><text:span text:style-name="T4">1Ch 4:4</text:span></text:p>
          <text:p text:style-name="P9"><text:span text:style-name="T9">Shuah</text:span></text:p>
          <text:p text:style-name="P9"><text:span text:style-name="T4">1Ch 4: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43.006cm" svg:y1="64.657cm" svg:x2="139.106cm" svg:y2="63.397cm" draw:start-shape="id409" draw:start-glue-point="0" draw:end-shape="id406" draw:end-glue-point="2" svg:d="M143006 64657c0-943-3900-314-3900-1260" svg:viewBox="0 0 3901 1261">
          <text:p/>
        </draw:connector>
        <draw:connector draw:style-name="gr2" draw:text-style-name="P3" draw:layer="layout" draw:type="curve" svg:x1="139.106cm" svg:y1="64.657cm" svg:x2="139.106cm" svg:y2="63.397cm" svg:d="M139106 64657v-1260" svg:viewBox="0 0 1 1261">
          <text:p/>
        </draw:connector>
        <draw:custom-shape draw:style-name="gr7" draw:text-style-name="P6" xml:id="id410" draw:id="id410" draw:layer="layout" svg:width="3.048cm" svg:height="2.54cm" svg:x="141.482cm" svg:y="68.157cm">
          <text:p text:style-name="P4"><text:span text:style-name="T5">Mebunnai</text:span></text:p>
          <text:p text:style-name="P4"><text:span text:style-name="T4">2Sa 23: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" draw:text-style-name="P3" draw:layer="layout" draw:type="curve" svg:x1="143.006cm" svg:y1="67.197cm" svg:x2="143.006cm" svg:y2="68.157cm" draw:start-shape="id409" draw:start-glue-point="2" draw:end-shape="id410" draw:end-glue-point="0" svg:d="M143006 67197v960" svg:viewBox="0 0 1 961">
          <text:p/>
        </draw:connector>
        <draw:custom-shape draw:style-name="gr54" draw:text-style-name="P33" xml:id="id411" draw:id="id411" draw:layer="layout" svg:width="3.048cm" svg:height="2.54cm" svg:x="137.61cm" svg:y="68.112cm">
          <text:p text:style-name="P32"><text:span text:style-name="T30">1Ch 4:11-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5" draw:text-style-name="P3" draw:layer="layout" svg:x1="139.134cm" svg:y1="67.197cm" svg:x2="139.134cm" svg:y2="68.112cm" draw:start-shape="id408" draw:start-glue-point="2" draw:end-shape="id411" draw:end-glue-point="0" svg:d="M139134 67197v915" svg:viewBox="0 0 1 916">
          <text:p/>
        </draw:connector>
        <draw:connector draw:style-name="gr6" draw:text-style-name="P3" draw:layer="layout" draw:type="curve" svg:x1="75.976cm" svg:y1="13.395cm" svg:x2="75.935cm" svg:y2="11.878cm" draw:start-shape="id223" draw:start-glue-point="0" draw:end-shape="id412" draw:end-glue-point="0" svg:d="M75976 13395c0-1098-41-340-41-1517" svg:viewBox="0 0 42 1518">
          <text:p/>
        </draw:connector>
        <draw:custom-shape draw:style-name="gr57" draw:text-style-name="P6" xml:id="id414" draw:id="id414" draw:layer="layout" svg:width="2.461cm" svg:height="1.445cm" svg:x="76.169cm" svg:y="11.153cm">
          <text:p text:style-name="P4"><text:span text:style-name="T5">Shuah</text:span></text:p>
          <text:p text:style-name="P4"><text:span text:style-name="T4">Gen 38:2,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3" xml:id="id412" draw:id="id412" draw:layer="layout" draw:type="curve" svg:x1="75.701cm" svg:y1="11.881cm" svg:x2="76.169cm" svg:y2="11.875cm" draw:start-shape="id413" draw:start-glue-point="1" draw:end-shape="id414" draw:end-glue-point="3" svg:d="M75701 11881c351 0 117-6 468-6" svg:viewBox="0 0 469 7">
          <text:p/>
        </draw:connector>
        <draw:frame draw:style-name="gr56" draw:text-style-name="P3" draw:layer="layout" svg:width="6.268cm" svg:height="3.403cm" svg:x="66.314cm" svg:y="28.22cm">
          <draw:image xlink:href="Pictures/10000001000001C5000000F66A07721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BlackChancery" svg:font-family="BlackChancery" style:font-pitch="variable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Gabriela Nerd Font1" svg:font-family="'Gabriela Nerd Fon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9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7cm" fo:padding-bottom="0.127cm" fo:padding-left="0.127cm" fo:padding-right="0.127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Gabriela Nerd Font1" fo:font-family="'Gabriela Nerd Font'" style:font-style-name="Regular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25cm" draw:marker-start-width="0.229cm" draw:marker-end-width="0.2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Gabriela Nerd Font1" fo:font-family="'Gabriela Nerd Font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Gabriela Nerd Font1" fo:font-family="'Gabriela Nerd Font'" style:font-style-name="Regular" style:font-pitch="variable" fo:font-size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152.4cm" fo:page-height="101.6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9T07:30:44.577000000</meta:creation-date>
    <dc:date>2026-07-11T12:32:04.363533747</dc:date>
    <meta:editing-duration>P2DT23H30M31S</meta:editing-duration>
    <meta:editing-cycles>1403</meta:editing-cycles>
    <meta:generator>LibreOffice/26.2.4.2$Linux_X86_64 LibreOffice_project/64a984c51f4702dbd3710b13428c673a2f1292e7</meta:generator>
    <meta:print-date>2025-06-13T22:00:40.382818700</meta:print-date>
    <meta:printed-by>PDF files</meta:printed-by>
    <dc:title>1 Chronicles 2</dc:title>
    <meta:document-statistic meta:object-count="864"/>
  </office:meta>
</office:document-meta>
</file>