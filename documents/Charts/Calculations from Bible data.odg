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Fonts/Font_Ubuntu_1.ttf" manifest:media-type="application/x-font-ttf"/>
  <manifest:file-entry manifest:full-path="Fonts/Font_Ubuntu_2.ttf" manifest:media-type="application/x-font-ttf"/>
  <manifest:file-entry manifest:full-path="Fonts/Font_Ubuntu_3.ttf" manifest:media-type="application/x-font-ttf"/>
  <manifest:file-entry manifest:full-path="Fonts/Font_Ubuntu_4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  <svg:font-face-uri xlink:href="Fonts/Font_Ubuntu_2.ttf" xlink:type="simple" loext:font-style="normal" loext:font-weight="bold">
          <svg:font-face-format svg:string="truetype"/>
        </svg:font-face-uri>
        <svg:font-face-uri xlink:href="Fonts/Font_Ubuntu_3.ttf" xlink:type="simple" loext:font-style="italic" loext:font-weight="normal">
          <svg:font-face-format svg:string="truetype"/>
        </svg:font-face-uri>
        <svg:font-face-uri xlink:href="Fonts/Font_Ubuntu_4.ttf" xlink:type="simple" loext:font-style="italic" loext:font-weight="bold">
          <svg:font-face-format svg:string="truetype"/>
        </svg:font-face-uri>
      </svg:font-face-src>
    </style:font-face>
    <style:font-face style:name="Ubuntu1" svg:font-family="Ubuntu" style:font-adornments="Regular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  <svg:font-face-uri xlink:href="Fonts/Font_Ubuntu_2.ttf" xlink:type="simple" loext:font-style="normal" loext:font-weight="bold">
          <svg:font-face-format svg:string="truetype"/>
        </svg:font-face-uri>
        <svg:font-face-uri xlink:href="Fonts/Font_Ubuntu_3.ttf" xlink:type="simple" loext:font-style="italic" loext:font-weight="normal">
          <svg:font-face-format svg:string="truetype"/>
        </svg:font-face-uri>
        <svg:font-face-uri xlink:href="Fonts/Font_Ubuntu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ot" svg:stroke-width="0cm" svg:stroke-color="#ff0000" svg:stroke-linecap="butt" draw:fill="none" draw:textarea-vertical-align="middle" loext:decorative="false"/>
    </style:style>
    <style:style style:name="gr2" style:family="graphic" style:parent-style-name="standard">
      <style:graphic-properties draw:fill="solid" draw:fill-color="#fff5ce" draw:textarea-horizontal-align="justify" draw:textarea-vertical-align="middle" draw:auto-grow-height="false" fo:min-height="3.185cm" fo:min-width="7.475cm" fo:wrap-option="wrap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ff0000" draw:fill="none" draw:textarea-vertical-align="middle" loext:decorative="false"/>
    </style:style>
    <style:style style:name="gr4" style:family="graphic" style:parent-style-name="objectwithoutfill">
      <style:graphic-properties draw:marker-start="Arrowheads_20_8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3.4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ff8000" draw:fill="none" draw:textarea-vertical-align="middle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objectwithoutfill">
      <style:graphic-properties draw:marker-start="" draw:marker-end="Arrowheads_20_7" draw:fill="non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8cm" fo:min-width="14.74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color="#ff0000" svg:stroke-linecap="butt" draw:fill="none" draw:textarea-horizontal-align="center" draw:textarea-vertical-align="middle" loext:decorative="false"/>
    </style:style>
    <style:style style:name="gr13" style:family="graphic" style:parent-style-name="objectwithoutfill">
      <style:graphic-properties draw:stroke="dash" draw:stroke-dash="Dash" svg:stroke-color="#ff8000" svg:stroke-linecap="butt" draw:fill="none" draw:textarea-vertical-align="middle" loext:decorative="false"/>
    </style:style>
    <style:style style:name="gr14" style:family="graphic" style:parent-style-name="standard" style:list-style-name="L1">
      <style:graphic-properties draw:stroke="solid" draw:stroke-dash="Dash_20_Dot_20_4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botto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>
      <style:graphic-properties draw:fill="solid" draw:fill-color="#ffd7d7" draw:textarea-horizontal-align="justify" draw:textarea-vertical-align="middle" draw:auto-grow-height="false" fo:min-height="1.338cm" fo:min-width="2.72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Dot_20_4" svg:stroke-width="0cm" svg:stroke-color="#55308d" draw:marker-start="Arrowheads_20_7" draw:marker-start-width="0.2cm" draw:marker-start-center="false" draw:marker-end="Arrowheads_20_7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24.11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start="Arrowheads_20_5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19.236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center" draw:textarea-vertical-align="middle" draw:auto-grow-height="false" fo:min-height="1.338cm" fo:min-width="23.63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338cm" fo:min-width="8.771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38cm" fo:min-width="23.935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38cm" fo:min-width="22.233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22.614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38cm" fo:min-width="22.487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338cm" fo:min-width="22.665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23.122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</style:style>
    <style:style style:name="gr30" style:family="graphic" style:parent-style-name="standard">
      <style:graphic-properties draw:marker-start="Arrowheads_20_4" draw:marker-start-width="0.3cm" draw:textarea-vertical-align="middle" loext:decorative="false"/>
      <style:paragraph-properties style:writing-mode="lr-tb"/>
    </style:style>
    <style:style style:name="gr31" style:family="graphic" style:parent-style-name="objectwithoutfill">
      <style:graphic-properties draw:marker-start="" draw:marker-end="Arrowheads_20_5" draw:fill="none" draw:textarea-vertical-align="middle" loext:decorative="false"/>
      <style:paragraph-properties style:writing-mode="lr-tb"/>
    </style:style>
    <style:style style:name="gr32" style:family="graphic" style:parent-style-name="objectwithoutfill">
      <style:graphic-properties draw:marker-start="Arrowheads_20_5" draw:marker-end="" draw:fill="none" draw:textarea-horizontal-align="center" draw:textarea-vertical-align="middle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_20_Dot_20_4" svg:stroke-width="0cm" svg:stroke-color="#3465a4" draw:marker-start="Arrowheads_20_5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>
      <style:graphic-properties draw:marker-start="Arrowheads_20_7" draw:marker-start-width="0.3cm" draw:textarea-vertical-align="middle" loext:decorative="false"/>
      <style:paragraph-properties style:writing-mode="lr-tb"/>
    </style:style>
    <style:style style:name="gr35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338cm" fo:min-width="10.625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start="Arrowheads_20_5" draw:fill="none" draw:textarea-horizontal-align="center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38cm" fo:min-width="11.286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38cm" fo:min-width="5.571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5.342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338cm" fo:min-width="3.259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338cm" fo:min-width="4.707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338cm" fo:min-width="3.94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_20_Dot_20_4" svg:stroke-width="0cm" svg:stroke-color="#3465a4" draw:marker-start="Arrowheads_20_5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Arrowheads_20_7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Arrowheads_20_7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_20_Dot_20_4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338cm" fo:min-width="2.98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338cm" fo:min-width="4.072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start="Arrowheads_20_7" draw:fill="none" draw:textarea-vertical-align="middle" loext:decorative="false"/>
      <style:paragraph-properties style:writing-mode="lr-tb"/>
    </style:style>
    <style:style style:name="gr51" style:family="graphic" style:parent-style-name="standard">
      <style:graphic-properties draw:fill="solid" draw:fill-color="#fff5ce" draw:textarea-horizontal-align="justify" draw:textarea-vertical-align="middle" draw:auto-grow-height="false" fo:min-height="4.308cm" fo:min-width="6.556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fff5ce" draw:textarea-horizontal-align="justify" draw:textarea-vertical-align="middle" draw:auto-grow-height="false" fo:min-height="1.349cm" fo:min-width="2.226cm" fo:wrap-option="wrap" style:writing-mode="lr-tb" loext:decorative="false"/>
      <style:paragraph-properties style:writing-mode="lr-tb"/>
    </style:style>
    <style:style style:name="gr53" style:family="graphic" style:parent-style-name="objectwithoutfill">
      <style:graphic-properties svg:stroke-color="#ff8000" draw:marker-start="" draw:marker-end="Arrowheads_20_7" draw:fill="none" draw:textarea-vertical-align="middle" loext:decorative="false"/>
      <style:paragraph-properties style:writing-mode="lr-tb"/>
    </style:style>
    <style:style style:name="gr54" style:family="graphic" style:parent-style-name="objectwithoutfill">
      <style:graphic-properties draw:marker-start="" draw:marker-end="" draw:fill="none" draw:textarea-vertical-align="middle" loext:decorative="false"/>
      <style:paragraph-properties style:writing-mode="lr-tb"/>
    </style:style>
    <style:style style:name="gr55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136cm" fo:padding-right="0.136cm" loext:decorative="false"/>
      <style:paragraph-properties style:writing-mode="lr-tb"/>
    </style:style>
    <style:style style:name="gr56" style:family="graphic" style:parent-style-name="standard">
      <style:graphic-properties draw:fill="solid" draw:fill-color="#fff5ce" draw:textarea-horizontal-align="justify" draw:textarea-vertical-align="middle" draw:auto-grow-height="false" fo:min-height="2.247cm" fo:min-width="4.336cm" fo:wrap-option="wrap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start="" draw:marker-end="Arrowheads_20_8" draw:fill="none" draw:textarea-vertical-align="middle" loext:decorative="false"/>
      <style:paragraph-properties style:writing-mode="lr-tb"/>
    </style:style>
    <style:style style:name="gr58" style:family="graphic" style:parent-style-name="standard">
      <style:graphic-properties draw:fill="solid" draw:fill-color="#fff5ce" draw:textarea-horizontal-align="justify" draw:textarea-vertical-align="middle" draw:auto-grow-height="false" fo:min-height="7.868cm" fo:min-width="11.817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338cm" fo:min-width="2.54cm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color="#3465a4" draw:fill="none" draw:textarea-vertical-align="middle" loext:decorative="false"/>
      <style:paragraph-properties style:writing-mode="lr-tb"/>
    </style:style>
    <style:style style:name="gr61" style:family="graphic" style:parent-style-name="standard">
      <style:graphic-properties svg:stroke-color="#ff0000" draw:textarea-vertical-align="middle" loext:decorative="false"/>
      <style:paragraph-properties style:writing-mode="lr-tb"/>
    </style:style>
    <style:style style:name="gr62" style:family="graphic" style:parent-style-name="standard">
      <style:graphic-properties draw:fill="solid" draw:fill-color="#fff5ce" draw:textarea-horizontal-align="justify" draw:textarea-vertical-align="middle" draw:auto-grow-height="false" fo:min-height="2.049cm" fo:min-width="4.166cm" fo:wrap-option="wrap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ffbf00" draw:fill="none" draw:textarea-vertical-align="middle" loext:decorative="false"/>
    </style:style>
    <style:style style:name="gr64" style:family="graphic" style:parent-style-name="standard">
      <style:graphic-properties draw:textarea-horizontal-align="justify" draw:textarea-vertical-align="middle" draw:auto-grow-height="false" fo:min-height="1.338cm" fo:min-width="2.548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127cm" fo:padding-right="0.127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>
      <style:graphic-properties draw:fill="solid" draw:fill-color="#fff5ce" draw:textarea-horizontal-align="justify" draw:textarea-vertical-align="middle" draw:auto-grow-height="false" fo:min-height="0.219cm" fo:min-width="0.246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textarea-vertical-align="middle" loext:decorative="false"/>
    </style:style>
    <style:style style:name="gr68" style:family="graphic" style:parent-style-name="standard">
      <style:graphic-properties draw:textarea-horizontal-align="justify" draw:textarea-vertical-align="middle" draw:auto-grow-height="false" fo:min-height="1.338cm" fo:min-width="2.794cm" style:writing-mode="lr-tb" loext:decorative="false"/>
      <style:paragraph-properties style:writing-mode="lr-tb"/>
    </style:style>
    <style:style style:name="gr69" style:family="graphic" style:parent-style-name="standard">
      <style:graphic-properties draw:fill="solid" draw:fill-color="#fff5ce" draw:textarea-horizontal-align="justify" draw:textarea-vertical-align="middle" draw:auto-grow-height="false" fo:min-height="0.72cm" fo:min-width="4.906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fill="solid" draw:fill-color="#fff5ce" draw:textarea-horizontal-align="justify" draw:textarea-vertical-align="middle" draw:auto-grow-height="false" fo:min-height="1.973cm" fo:min-width="3.732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fff5ce" draw:textarea-horizontal-align="justify" draw:textarea-vertical-align="middle" draw:auto-grow-height="false" fo:min-height="0.572cm" fo:min-width="3.594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fill="solid" draw:fill-color="#fff5ce" draw:textarea-horizontal-align="justify" draw:textarea-vertical-align="middle" draw:auto-grow-height="false" fo:min-height="1.54cm" fo:min-width="4.657cm" fo:wrap-option="wrap" style:writing-mode="lr-tb" loext:decorative="false"/>
      <style:paragraph-properties style:writing-mode="lr-tb"/>
    </style:style>
    <style:style style:name="gr73" style:family="graphic" style:parent-style-name="standard">
      <style:graphic-properties draw:fill="solid" draw:fill-color="#fff5ce" draw:textarea-horizontal-align="justify" draw:textarea-vertical-align="middle" draw:auto-grow-height="false" fo:min-height="4.454cm" fo:min-width="5.413cm" fo:wrap-option="wrap" style:writing-mode="lr-tb" loext:decorative="false"/>
      <style:paragraph-properties style:writing-mode="lr-tb"/>
    </style:style>
    <style:style style:name="gr74" style:family="graphic" style:parent-style-name="objectwithoutfill">
      <style:graphic-properties draw:stroke="dash" draw:stroke-dash="Dot" svg:stroke-color="#ffbf00" svg:stroke-linecap="butt" draw:fill="none" draw:textarea-vertical-align="middle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1.338cm" fo:min-width="2.87cm" style:writing-mode="lr-tb" loext:decorative="false"/>
      <style:paragraph-properties style:writing-mode="lr-tb"/>
    </style:style>
    <style:style style:name="gr76" style:family="graphic" style:parent-style-name="standard">
      <style:graphic-properties draw:fill="solid" draw:fill-color="#fff5ce" draw:textarea-horizontal-align="justify" draw:textarea-vertical-align="middle" draw:auto-grow-height="false" fo:min-height="1.304cm" fo:min-width="6.46cm" fo:wrap-option="wrap" style:writing-mode="lr-tb" loext:decorative="false"/>
      <style:paragraph-properties style:writing-mode="lr-tb"/>
    </style:style>
    <style:style style:name="gr77" style:family="graphic" style:parent-style-name="objectwithoutfill">
      <style:graphic-properties draw:marker-start="Arrowheads_20_9" draw:marker-end="" draw:fill="none" draw:textarea-vertical-align="middle" loext:decorative="false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1.338cm" fo:min-width="1.905cm" style:writing-mode="lr-tb" loext:decorative="false"/>
      <style:paragraph-properties style:writing-mode="lr-tb"/>
    </style:style>
    <style:style style:name="gr79" style:family="graphic" style:parent-style-name="objectwithoutfill">
      <style:graphic-properties svg:stroke-color="#55308d" draw:fill="none" draw:textarea-vertical-align="middle" loext:decorative="false"/>
    </style:style>
    <style:style style:name="gr80" style:family="graphic" style:parent-style-name="standard">
      <style:graphic-properties draw:fill="solid" draw:fill-color="#fff5ce" draw:textarea-horizontal-align="justify" draw:textarea-vertical-align="middle" draw:auto-grow-height="false" fo:min-height="4.139cm" fo:min-width="7.549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_20_Dot_20_4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127cm" fo:padding-right="0.127cm" fo:wrap-option="wrap" draw:shadow="hidden" draw:shadow-offset-x="0.2cm" draw:shadow-offset-y="0.2cm" draw:shadow-color="#808080" loext:decorative="false"/>
    </style:style>
    <style:style style:name="gr82" style:family="graphic" style:parent-style-name="objectwithoutfill">
      <style:graphic-properties draw:stroke="dash" draw:stroke-dash="Dash" svg:stroke-color="#ff8000" svg:stroke-linecap="butt" draw:fill="none" draw:textarea-vertical-align="middle" loext:decorative="false"/>
      <style:paragraph-properties style:writing-mode="lr-tb"/>
    </style:style>
    <style:style style:name="gr83" style:family="graphic" style:parent-style-name="objectwithoutfill">
      <style:graphic-properties draw:stroke="dash" draw:stroke-dash="Long_20_Dot" svg:stroke-color="#55308d" svg:stroke-linecap="butt" draw:fill="none" draw:textarea-vertical-align="middle" loext:decorative="false"/>
    </style:style>
    <style:style style:name="gr84" style:family="graphic" style:parent-style-name="objectwithoutfill">
      <style:graphic-properties draw:stroke="dash" draw:stroke-dash="Dot" svg:stroke-linecap="butt" draw:fill="none" draw:textarea-vertical-align="middle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fff5ce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Ubuntu" fo:font-size="12pt"/>
    </style:style>
    <style:style style:name="P7" style:family="paragraph">
      <style:paragraph-properties fo:text-align="center" style:writing-mode="lr-tb"/>
      <style:text-properties style:font-name="Ubuntu"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right"/>
      <style:text-properties style:use-window-font-color="true" loext:opacity="0%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righ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d7d7"/>
      <style:paragraph-properties fo:text-align="center" style:writing-mode="lr-tb"/>
      <style:text-properties style:font-name="Ubuntu" fo:font-size="12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55308d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  <style:text-properties fo:font-size="12pt"/>
    </style:style>
    <style:style style:name="P1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7" style:family="paragraph">
      <style:paragraph-properties fo:text-align="right"/>
    </style:style>
    <style:style style:name="P18" style:family="paragraph">
      <loext:graphic-properties draw:fill="none"/>
      <style:paragraph-properties fo:text-align="righ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center"/>
      <style:text-properties fo:font-size="8pt"/>
    </style:style>
    <style:style style:name="P25" style:family="paragraph">
      <loext:graphic-properties draw:fill="solid" draw:fill-color="#fff5ce"/>
      <style:paragraph-properties fo:text-align="center" style:writing-mode="lr-tb"/>
      <style:text-properties fo:font-size="8pt"/>
    </style:style>
    <style:style style:name="P26" style:family="paragraph">
      <loext:graphic-properties draw:fill="none"/>
      <style:paragraph-properties fo:text-align="center"/>
      <style:text-properties fo:font-size="2pt" style:font-size-asian="2pt" style:font-size-complex="2pt"/>
    </style:style>
    <style:style style:name="P27" style:family="paragraph">
      <style:paragraph-properties fo:text-align="center"/>
      <style:text-properties fo:font-size="2pt" style:font-size-asian="2pt" style:font-size-complex="2pt"/>
    </style:style>
    <style:style style:name="P28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29" style:family="paragraph">
      <loext:graphic-properties draw:fill="solid" draw:fill-color="#fff5ce"/>
      <style:paragraph-properties fo:text-align="center" style:writing-mode="lr-tb"/>
    </style:style>
    <style:style style:name="P30" style:family="paragraph">
      <style:paragraph-properties fo:text-align="center"/>
      <style:text-properties style:font-name="Ubuntu" fo:font-size="10pt" style:font-size-asian="10pt" style:font-size-complex="10pt"/>
    </style:style>
    <style:style style:name="P31" style:family="paragraph">
      <style:paragraph-properties fo:text-align="center" style:writing-mode="lr-tb"/>
      <style:text-properties style:font-name="Ubuntu" fo:font-size="10pt" style:font-size-asian="10pt" style:font-size-complex="10pt"/>
    </style:style>
    <style:style style:name="P32" style:family="paragraph">
      <style:paragraph-properties fo:text-align="left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align="left" fo:text-indent="0cm"/>
      <style:text-properties fo:font-size="14pt" style:font-size-asian="14pt" style:font-size-complex="14pt"/>
    </style:style>
    <style:style style:name="P34" style:family="paragraph">
      <loext:graphic-properties draw:fill="solid" draw:fill-color="#fff5ce"/>
      <style:paragraph-properties fo:text-align="left" style:writing-mode="lr-tb"/>
      <style:text-properties fo:font-size="14pt" style:font-size-asian="14pt" style:font-size-complex="14pt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Ubuntu"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5308d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Ubuntu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8pt"/>
    </style:style>
    <style:style style:name="T18" style:family="text">
      <style:text-properties fo:font-size="8pt" fo:font-weight="bold" style:font-weight-asian="bold" style:font-weight-complex="bold"/>
    </style:style>
    <style:style style:name="T19" style:family="text">
      <style:text-properties fo:font-size="8pt" fo:font-style="italic" style:font-style-asian="italic" style:font-style-complex="italic"/>
    </style:style>
    <style:style style:name="T20" style:family="text">
      <style:text-properties fo:font-size="2pt" style:font-size-asian="2pt" style:font-size-complex="2pt"/>
    </style:style>
    <style:style style:name="T21" style:family="text">
      <style:text-properties fo:font-size="4pt" style:font-size-asian="4pt" style:font-size-complex="4pt"/>
    </style:style>
    <style:style style:name="T22" style:family="text">
      <style:text-properties style:font-name="Ubuntu" fo:font-size="10pt" style:font-size-asian="10pt" style:font-size-complex="10pt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text-position="super 58%" fo:font-size="8pt" fo:font-weight="normal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0000" loext:opacity="100%" fo:font-size="12pt"/>
    </style:style>
    <style:style style:name="T27" style:family="text">
      <style:text-properties style:text-position="super 58%" fo:font-size="8pt"/>
    </style:style>
    <style:style style:name="T28" style:family="text">
      <style:text-properties fo:color="#ff0000" loext:opacity="100%" fo:font-size="8pt"/>
    </style:style>
    <style:style style:name="T29" style:family="text">
      <style:text-properties fo:font-size="8pt" fo:font-weight="normal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per 58%" fo:font-size="14pt" style:font-size-asian="14pt" style:font-size-complex="14pt"/>
    </style:style>
    <style:style style:name="T33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6.083cm" svg:y1="33.758cm" svg:x2="56.083cm" svg:y2="60.092cm">
          <text:p/>
        </draw:line>
        <draw:custom-shape draw:style-name="gr2" draw:text-style-name="P3" draw:layer="layout" svg:width="8.347cm" svg:height="3.709cm" svg:x="71.357cm" svg:y="64.281cm">
          <text:p text:style-name="P2"><text:span text:style-name="T1">Crossing of the Jordan</text:span></text:p>
          <text:p text:style-name="P2"><text:span text:style-name="T2">(43</text:span><text:span text:style-name="T3">rd</text:span><text:span text:style-name="T2"> year, 1</text:span><text:span text:style-name="T3">st</text:span><text:span text:style-name="T2"> month, 10</text:span><text:span text:style-name="T3">th</text:span><text:span text:style-name="T2"> day)</text:span></text:p>
          <text:p text:style-name="P2"><text:span text:style-name="T2"/></text:p>
          <text:p text:style-name="P2"><text:span text:style-name="T4">Joshua 14:15</text:span><text:span text:style-name="T2"> “..And the land had rest from war.”</text:span></text:p>
          <text:p text:style-name="P2"><text:span text:style-name="T2">This is the end of the “United Conquest” and the beginning of the “Tribal Occupation &amp; Possession”.</text:span></text:p>
          <text:p text:style-name="P2"><text:span text:style-name="T2"/></text:p>
          <text:p text:style-name="P2"><text:span text:style-name="T2">The “United Conquest” took a minimum of </text:span></text:p>
          <text:p text:style-name="P2"><text:span text:style-name="T2">1,431 days (3 years, 11 months, 21 days)</text:span></text:p>
          <text:p text:style-name="P2"><text:span text:style-name="T2">to a maximum of</text:span></text:p>
          <text:p text:style-name="P2"><text:span text:style-name="T2">1,790 days (4 years, 11 months, 20 days)</text:span></text:p>
          <draw:enhanced-geometry svg:viewBox="0 0 21600 21600" draw:text-areas="800 800 20800 20800" draw:type="round-rectangular-callout" draw:modifiers="-2980.73790129372 17390.6199460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3" draw:text-style-name="P1" draw:layer="layout" svg:x1="70.053cm" svg:y1="73.459cm" svg:x2="70.053cm" svg:y2="70.284cm">
          <text:p/>
        </draw:line>
        <draw:line draw:style-name="gr4" draw:text-style-name="P4" draw:layer="layout" svg:x1="70.053cm" svg:y1="73.459cm" svg:x2="70.053cm" svg:y2="75.967cm">
          <text:p/>
        </draw:line>
        <draw:line draw:style-name="gr5" draw:text-style-name="P1" draw:layer="layout" svg:x1="69.036cm" svg:y1="75.047cm" svg:x2="69.036cm" svg:y2="73.46cm">
          <text:p/>
        </draw:line>
        <draw:line draw:style-name="gr3" draw:text-style-name="P1" draw:layer="layout" svg:x1="69.063cm" svg:y1="67.263cm" svg:x2="69.063cm" svg:y2="73.46cm">
          <text:p/>
        </draw:line>
        <draw:line draw:style-name="gr6" draw:text-style-name="P1" draw:layer="layout" svg:x1="43.335cm" svg:y1="75.259cm" svg:x2="57.125cm" svg:y2="75.249cm">
          <text:p text:style-name="P5"/>
          <text:p text:style-name="P5">543 <text:s text:c="65"/><text:s text:c="64"/></text:p>
        </draw:line>
        <draw:line draw:style-name="gr6" draw:text-style-name="P1" draw:layer="layout" svg:x1="43.332cm" svg:y1="60.108cm" svg:x2="52.934cm" svg:y2="60.108cm">
          <text:p text:style-name="P5"/>
          <text:p text:style-name="P5">378 <text:s text:c="35"/><text:s text:c="43"/><text:s text:c="8"/></text:p>
        </draw:line>
        <draw:line draw:style-name="gr6" draw:text-style-name="P1" draw:layer="layout" svg:x1="43.332cm" svg:y1="50.265cm" svg:x2="48.971cm" svg:y2="50.265cm">
          <text:p text:style-name="P5"/>
          <text:p text:style-name="P5">222 <text:s text:c="10"/><text:s text:c="19"/><text:s text:c="16"/></text:p>
        </draw:line>
        <draw:line draw:style-name="gr6" draw:text-style-name="P1" draw:layer="layout" svg:x1="43.335cm" svg:y1="47.909cm" svg:x2="48.235cm" svg:y2="47.909cm">
          <text:p text:style-name="P5"/>
          <text:p text:style-name="P5">193 <text:s text:c="9"/><text:s text:c="17"/><text:s text:c="12"/></text:p>
        </draw:line>
        <draw:line draw:style-name="gr6" draw:text-style-name="P1" draw:layer="layout" svg:x1="43.335cm" svg:y1="45.561cm" svg:x2="47.46cm" svg:y2="45.559cm">
          <text:p text:style-name="P5"/>
          <text:p text:style-name="P5">162 <text:s text:c="30"/></text:p>
        </draw:line>
        <draw:line draw:style-name="gr6" draw:text-style-name="P1" draw:layer="layout" svg:x1="43.335cm" svg:y1="43.184cm" svg:x2="46.66cm" svg:y2="43.184cm">
          <text:p text:style-name="P5"/>
          <text:p text:style-name="P5">131 <text:s text:c="2"/><text:s text:c="5"/><text:s text:c="5"/><text:s text:c="5"/><text:s text:c="5"/></text:p>
        </draw:line>
        <draw:line draw:style-name="gr6" draw:text-style-name="P1" draw:layer="layout" svg:x1="43.335cm" svg:y1="38.51cm" svg:x2="45.034cm" svg:y2="38.509cm">
          <text:p text:style-name="P5"/>
          <text:p text:style-name="P5">67 <text:s text:c="7"/></text:p>
        </draw:line>
        <draw:custom-shape draw:style-name="gr7" draw:text-style-name="P7" draw:layer="layout" svg:width="3.734cm" svg:height="1.588cm" svg:x="54.813cm" svg:y="65.838cm">
          <text:p text:style-name="P6"><text:span text:style-name="T5">Jacob <text:s text:c="5"/></text:span></text:p>
          <text:p text:style-name="P6"><text:span text:style-name="T5">147 <text:s text:c="5"/>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8.115cm" svg:y1="67.426cm" svg:x2="58.115cm" svg:y2="75.249cm">
          <text:p text:style-name="P5"><text:span text:style-name="T6">Gen 45:6, </text:span><text:span text:style-name="T6">47:9</text:span></text:p>
          <text:p text:style-name="P5"><text:span text:style-name="T6"/></text:p>
        </draw:line>
        <draw:line draw:style-name="gr9" draw:text-style-name="P9" draw:layer="layout" svg:x1="52.934cm" svg:y1="54.199cm" svg:x2="52.934cm" svg:y2="58.697cm">
          <text:p text:style-name="P8"><text:span text:style-name="T7">86 <text:s text:c="28"/></text:span></text:p>
          <text:p text:style-name="P8"><text:span text:style-name="T7"/></text:p>
        </draw:line>
        <draw:line draw:style-name="gr10" draw:text-style-name="P10" draw:layer="layout" svg:x1="52.934cm" svg:y1="58.697cm" svg:x2="52.934cm" svg:y2="60.092cm">
          <text:p text:style-name="P5"><text:span text:style-name="T2">2034AM</text:span></text:p>
          <text:p text:style-name="P5"><text:span text:style-name="T2"/></text:p>
        </draw:line>
        <draw:custom-shape draw:style-name="gr11" draw:text-style-name="P7" draw:layer="layout" svg:width="15.24cm" svg:height="1.588cm" svg:x="40.843cm" svg:y="30.443cm">
          <text:p text:style-name="P6"><text:span text:style-name="T5">Shem</text:span></text:p>
          <text:p text:style-name="P6"><text:span text:style-name="T5">600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0.286cm" svg:y1="24.2cm" svg:x2="43.206cm" svg:y2="24.2cm">
          <text:p text:style-name="P5"/>
          <text:p text:style-name="P5">115</text:p>
        </draw:line>
        <draw:line draw:style-name="gr12" draw:text-style-name="P11" draw:layer="layout" svg:x1="43.332cm" svg:y1="1.27cm" svg:x2="43.335cm" svg:y2="81.295cm">
          <text:p/>
        </draw:line>
        <draw:line draw:style-name="gr13" draw:text-style-name="P1" draw:layer="layout" svg:x1="40.286cm" svg:y1="1.27cm" svg:x2="40.286cm" svg:y2="81.305cm">
          <text:p/>
        </draw:line>
        <draw:line draw:style-name="gr5" draw:text-style-name="P1" draw:layer="layout" svg:x1="53.315cm" svg:y1="48.417cm" svg:x2="53.315cm" svg:y2="47.147cm">
          <text:p/>
        </draw:line>
        <draw:line draw:style-name="gr14" draw:text-style-name="P12" draw:layer="layout" svg:x1="53.289cm" svg:y1="54.2cm" svg:x2="53.289cm" svg:y2="63.488cm">
          <text:p/>
        </draw:line>
        <draw:custom-shape draw:style-name="gr15" draw:text-style-name="P13" draw:layer="layout" svg:width="3.226cm" svg:height="1.588cm" svg:x="50.495cm" svg:y="57.109cm">
          <text:p text:style-name="P6"><text:span text:style-name="T5">Sarai/Sarah</text:span></text:p>
          <text:p text:style-name="P6"><text:span text:style-name="T5">127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53.264cm" svg:y1="54.2cm" svg:x2="53.264cm" svg:y2="60.093cm">
          <text:p text:style-name="P8"><text:span text:style-name="T8"/></text:p>
          <text:p text:style-name="P8"><text:span text:style-name="T8">(99) circumcised </text:span><text:span text:style-name="T8">(13)</text:span></text:p>
          <text:p text:style-name="P8"><text:span text:style-name="T8"/></text:p>
          <text:p text:style-name="P8"><text:span text:style-name="T8"/></text:p>
        </draw:line>
        <draw:custom-shape draw:style-name="gr17" draw:text-style-name="P7" draw:layer="layout" svg:width="24.613cm" svg:height="1.588cm" svg:x="18.72cm" svg:y="21.914cm">
          <text:p text:style-name="P6"><text:span text:style-name="T5">Methuselah</text:span></text:p>
          <text:p text:style-name="P6"><text:span text:style-name="T5">969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23.47cm" svg:y1="23.503cm" svg:x2="23.47cm" svg:y2="24.773cm">
          <text:p text:style-name="P5"><text:span text:style-name="T9">187</text:span></text:p>
          <text:p text:style-name="P5"><text:span text:style-name="T9"/></text:p>
        </draw:line>
        <draw:custom-shape draw:style-name="gr19" draw:text-style-name="P7" draw:layer="layout" svg:width="19.736cm" svg:height="1.588cm" svg:x="23.47cm" svg:y="24.674cm">
          <text:p text:style-name="P6"><text:span text:style-name="T5">Lamech</text:span></text:p>
          <text:p text:style-name="P6"><text:span text:style-name="T5">777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28.093cm" svg:y1="26.269cm" svg:x2="28.093cm" svg:y2="27.539cm">
          <text:p text:style-name="P5"><text:span text:style-name="T9">182</text:span></text:p>
          <text:p text:style-name="P5"><text:span text:style-name="T9"/></text:p>
        </draw:line>
        <draw:custom-shape draw:style-name="gr20" draw:text-style-name="P7" draw:layer="layout" svg:width="24.13cm" svg:height="1.588cm" svg:x="28.093cm" svg:y="27.539cm">
          <text:p text:style-name="P6"><text:span text:style-name="T5"><text:s text:c="16"/></text:span><text:span text:style-name="T5"><text:s text:c="8"/></text:span><text:span text:style-name="T5">Noah</text:span></text:p>
          <text:p text:style-name="P6"><text:span text:style-name="T5"><text:s text:c="16"/></text:span><text:span text:style-name="T5"><text:s text:c="8"/></text:span><text:span text:style-name="T5">950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43.206cm" svg:y1="24.674cm" svg:x2="43.333cm" svg:y2="24.674cm">
          <text:p text:style-name="P5"><text:span text:style-name="T10"/></text:p>
          <text:p text:style-name="P5"><text:span text:style-name="T10">5</text:span></text:p>
        </draw:line>
        <draw:custom-shape draw:style-name="gr21" draw:text-style-name="P7" draw:layer="layout" svg:width="9.271cm" svg:height="1.588cm" svg:x="17.069cm" svg:y="19.056cm">
          <text:p text:style-name="P6"><text:span text:style-name="T5">Enoch</text:span></text:p>
          <text:p text:style-name="P6"><text:span text:style-name="T5">365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18.72cm" svg:y1="20.644cm" svg:x2="18.72cm" svg:y2="21.914cm">
          <text:p text:style-name="P5"><text:span text:style-name="T9">65</text:span></text:p>
          <text:p text:style-name="P5"><text:span text:style-name="T9"/></text:p>
        </draw:line>
        <draw:custom-shape draw:style-name="gr22" draw:text-style-name="P7" draw:layer="layout" svg:width="24.435cm" svg:height="1.588cm" svg:x="12.954cm" svg:y="16.198cm">
          <text:p text:style-name="P6"><text:span text:style-name="T5">Ja</text:span><text:span text:style-name="T5">re</text:span><text:span text:style-name="T5">d</text:span></text:p>
          <text:p text:style-name="P6"><text:span text:style-name="T5">96</text:span><text:span text:style-name="T5">2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17.069cm" svg:y1="17.786cm" svg:x2="17.069cm" svg:y2="19.056cm">
          <text:p text:style-name="P5"><text:span text:style-name="T9">162</text:span></text:p>
          <text:p text:style-name="P5"><text:span text:style-name="T9"/></text:p>
        </draw:line>
        <draw:line draw:style-name="gr18" draw:text-style-name="P15" draw:layer="layout" svg:x1="12.954cm" svg:y1="14.928cm" svg:x2="12.954cm" svg:y2="16.198cm">
          <text:p text:style-name="P5"><text:span text:style-name="T9">65</text:span></text:p>
          <text:p text:style-name="P5"><text:span text:style-name="T9"/></text:p>
        </draw:line>
        <draw:custom-shape draw:style-name="gr23" draw:text-style-name="P7" draw:layer="layout" svg:width="22.733cm" svg:height="1.588cm" svg:x="11.303cm" svg:y="13.34cm">
          <text:p text:style-name="P6"><text:span text:style-name="T5">Mahalaleel</text:span></text:p>
          <text:p text:style-name="P6"><text:span text:style-name="T5">895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11.303cm" svg:y1="12.09cm" svg:x2="11.303cm" svg:y2="13.36cm">
          <text:p text:style-name="P5"><text:span text:style-name="T9">70</text:span></text:p>
          <text:p text:style-name="P5"><text:span text:style-name="T9"/></text:p>
        </draw:line>
        <draw:custom-shape draw:style-name="gr24" draw:text-style-name="P7" draw:layer="layout" svg:width="23.114cm" svg:height="1.588cm" svg:x="9.525cm" svg:y="10.502cm">
          <text:p text:style-name="P6"><text:span text:style-name="T5">Cainan</text:span></text:p>
          <text:p text:style-name="P6"><text:span text:style-name="T5">910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2.987cm" svg:height="1.588cm" svg:x="7.239cm" svg:y="7.644cm">
          <text:p text:style-name="P6"><text:span text:style-name="T5">Enos</text:span></text:p>
          <text:p text:style-name="P6"><text:span text:style-name="T5">905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9.525cm" svg:y1="9.232cm" svg:x2="9.525cm" svg:y2="10.502cm">
          <text:p text:style-name="P5"><text:span text:style-name="T9">90</text:span></text:p>
          <text:p text:style-name="P5"><text:span text:style-name="T9"/></text:p>
        </draw:line>
        <draw:custom-shape draw:style-name="gr26" draw:text-style-name="P7" draw:layer="layout" svg:width="23.165cm" svg:height="1.588cm" svg:x="4.572cm" svg:y="4.786cm">
          <text:p text:style-name="P6"><text:span text:style-name="T5">Seth</text:span></text:p>
          <text:p text:style-name="P6"><text:span text:style-name="T5">912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7.239cm" svg:y1="6.374cm" svg:x2="7.239cm" svg:y2="7.644cm">
          <text:p text:style-name="P5"><text:span text:style-name="T9">105</text:span></text:p>
          <text:p text:style-name="P5"><text:span text:style-name="T9"/></text:p>
        </draw:line>
        <draw:line draw:style-name="gr18" draw:text-style-name="P15" draw:layer="layout" svg:x1="4.572cm" svg:y1="3.516cm" svg:x2="4.572cm" svg:y2="4.786cm">
          <text:p text:style-name="P5"><text:span text:style-name="T9">130</text:span></text:p>
          <text:p text:style-name="P5"><text:span text:style-name="T9"/></text:p>
        </draw:line>
        <draw:custom-shape draw:style-name="gr27" draw:text-style-name="P7" draw:layer="layout" svg:width="23.622cm" svg:height="1.588cm" svg:x="1.27cm" svg:y="1.928cm">
          <text:p text:style-name="P6"><text:span text:style-name="T5">Adam</text:span></text:p>
          <text:p text:style-name="P6"><text:span text:style-name="T5">930</text:span></text:p>
          <draw:enhanced-geometry svg:viewBox="0 0 21600 21600" draw:type="rectangle" draw:enhanced-path="M 0 0 L 21600 0 21600 21600 0 21600 0 0 Z N"/>
        </draw:custom-shape>
        <draw:line draw:style-name="gr28" draw:text-style-name="P18" draw:layer="layout" svg:x1="1.27cm" svg:y1="1.27cm" svg:x2="43.333cm" svg:y2="1.273cm">
          <text:p text:style-name="P17">1656</text:p>
          <text:p text:style-name="P17"/>
        </draw:line>
        <draw:line draw:style-name="gr29" draw:text-style-name="P1" draw:layer="layout" svg:x1="1.27cm" svg:y1="1.27cm" svg:x2="1.27cm" svg:y2="3.516cm">
          <text:p/>
        </draw:line>
        <draw:line draw:style-name="gr6" draw:text-style-name="P1" draw:layer="layout" svg:x1="37.389cm" svg:y1="16.198cm" svg:x2="43.334cm" svg:y2="16.198cm">
          <text:p text:style-name="P5"/>
          <text:p text:style-name="P5">234</text:p>
        </draw:line>
        <draw:line draw:style-name="gr6" draw:text-style-name="P1" draw:layer="layout" svg:x1="34.036cm" svg:y1="13.349cm" svg:x2="43.333cm" svg:y2="13.349cm">
          <text:p text:style-name="P5"/>
          <text:p text:style-name="P5">366</text:p>
        </draw:line>
        <draw:line draw:style-name="gr6" draw:text-style-name="P1" draw:layer="layout" svg:x1="32.639cm" svg:y1="10.502cm" svg:x2="43.333cm" svg:y2="10.501cm">
          <text:p text:style-name="P5"/>
          <text:p text:style-name="P5">421</text:p>
        </draw:line>
        <draw:line draw:style-name="gr6" draw:text-style-name="P1" draw:layer="layout" svg:x1="30.226cm" svg:y1="7.644cm" svg:x2="43.335cm" svg:y2="7.643cm">
          <text:p text:style-name="P5"/>
          <text:p text:style-name="P5">516</text:p>
        </draw:line>
        <draw:line draw:style-name="gr6" draw:text-style-name="P1" draw:layer="layout" svg:x1="27.737cm" svg:y1="4.786cm" svg:x2="43.333cm" svg:y2="4.787cm">
          <text:p text:style-name="P5"/>
          <text:p text:style-name="P5">614</text:p>
        </draw:line>
        <draw:line draw:style-name="gr6" draw:text-style-name="P1" draw:layer="layout" svg:x1="24.892cm" svg:y1="1.928cm" svg:x2="43.333cm" svg:y2="1.927cm">
          <text:p text:style-name="P5"/>
          <text:p text:style-name="P5">726</text:p>
        </draw:line>
        <draw:line draw:style-name="gr6" draw:text-style-name="P1" draw:layer="layout" svg:x1="26.34cm" svg:y1="19.056cm" svg:x2="43.333cm" svg:y2="19.057cm">
          <text:p text:style-name="P5"/>
          <text:p text:style-name="P5">669</text:p>
        </draw:line>
        <draw:line draw:style-name="gr30" draw:text-style-name="P5" draw:layer="layout" svg:x1="43.333cm" svg:y1="2.721cm" svg:x2="47.346cm" svg:y2="2.721cm">
          <text:p text:style-name="P5">Flood 1656AM</text:p>
          <text:p text:style-name="P5">2348BC (Ussher)</text:p>
        </draw:line>
        <draw:line draw:style-name="gr18" draw:text-style-name="P15" draw:layer="layout" svg:x1="26.339cm" svg:y1="17.786cm" svg:x2="26.339cm" svg:y2="19.056cm">
          <text:p text:style-name="P5"><text:span text:style-name="T9">527</text:span></text:p>
          <text:p text:style-name="P5"><text:span text:style-name="T9"/></text:p>
        </draw:line>
        <draw:line draw:style-name="gr30" draw:text-style-name="P5" draw:layer="layout" svg:x1="43.206cm" svg:y1="25.821cm" svg:x2="45.492cm" svg:y2="25.821cm">
          <text:p text:style-name="P5">Lamech</text:p>
          <text:p text:style-name="P5">1651AM</text:p>
        </draw:line>
        <draw:line draw:style-name="gr31" draw:text-style-name="P15" draw:layer="layout" svg:x1="24.892cm" svg:y1="3.516cm" svg:x2="24.892cm" svg:y2="4.786cm">
          <text:p text:style-name="P5"><text:span text:style-name="T9">800</text:span></text:p>
          <text:p text:style-name="P5"><text:span text:style-name="T9"/></text:p>
        </draw:line>
        <draw:line draw:style-name="gr31" draw:text-style-name="P15" draw:layer="layout" svg:x1="27.737cm" svg:y1="6.374cm" svg:x2="27.737cm" svg:y2="7.644cm">
          <text:p text:style-name="P5"><text:span text:style-name="T9">807</text:span></text:p>
          <text:p text:style-name="P5"><text:span text:style-name="T9"/></text:p>
        </draw:line>
        <draw:line draw:style-name="gr31" draw:text-style-name="P15" draw:layer="layout" svg:x1="30.226cm" svg:y1="9.232cm" svg:x2="30.226cm" svg:y2="10.502cm">
          <text:p text:style-name="P5"><text:span text:style-name="T9">815</text:span></text:p>
          <text:p text:style-name="P5"><text:span text:style-name="T9"/></text:p>
        </draw:line>
        <draw:line draw:style-name="gr31" draw:text-style-name="P15" draw:layer="layout" svg:x1="32.639cm" svg:y1="12.07cm" svg:x2="32.639cm" svg:y2="13.34cm">
          <text:p text:style-name="P5"><text:span text:style-name="T9">840</text:span></text:p>
          <text:p text:style-name="P5"><text:span text:style-name="T9"/></text:p>
        </draw:line>
        <draw:line draw:style-name="gr31" draw:text-style-name="P15" draw:layer="layout" svg:x1="34.036cm" svg:y1="14.928cm" svg:x2="34.036cm" svg:y2="16.198cm">
          <text:p text:style-name="P5"><text:span text:style-name="T9">833</text:span></text:p>
          <text:p text:style-name="P5"><text:span text:style-name="T9"/></text:p>
        </draw:line>
        <draw:line draw:style-name="gr31" draw:text-style-name="P15" draw:layer="layout" svg:x1="26.34cm" svg:y1="20.644cm" svg:x2="26.34cm" svg:y2="21.914cm">
          <text:p text:style-name="P5"><text:span text:style-name="T9">300</text:span></text:p>
          <text:p text:style-name="P5"><text:span text:style-name="T9"/></text:p>
        </draw:line>
        <draw:line draw:style-name="gr31" draw:text-style-name="P15" draw:layer="layout" svg:x1="37.374cm" svg:y1="17.786cm" svg:x2="37.374cm" svg:y2="21.914cm">
          <text:p text:style-name="P5"><text:span text:style-name="T9">7</text:span><text:span text:style-name="T9">3</text:span><text:span text:style-name="T9">5</text:span></text:p>
          <text:p text:style-name="P5"><text:span text:style-name="T9"/></text:p>
        </draw:line>
        <draw:line draw:style-name="gr18" draw:text-style-name="P15" draw:layer="layout" svg:x1="43.206cm" svg:y1="23.502cm" svg:x2="43.206cm" svg:y2="24.674cm">
          <text:p text:style-name="P5"><text:span text:style-name="T9"/></text:p>
          <text:p text:style-name="P5"><text:span text:style-name="T9">96</text:span><text:span text:style-name="T9">4</text:span></text:p>
        </draw:line>
        <draw:line draw:style-name="gr31" draw:text-style-name="P15" draw:layer="layout" svg:x1="43.206cm" svg:y1="26.269cm" svg:x2="43.206cm" svg:y2="27.539cm">
          <text:p text:style-name="P5"><text:span text:style-name="T9"/></text:p>
          <text:p text:style-name="P5"><text:span text:style-name="T9">59</text:span><text:span text:style-name="T9">5</text:span></text:p>
        </draw:line>
        <draw:line draw:style-name="gr31" draw:text-style-name="P15" draw:layer="layout" svg:x1="52.222cm" svg:y1="25.507cm" svg:x2="52.222cm" svg:y2="27.539cm">
          <text:p text:style-name="P5"><text:span text:style-name="T9">2006AM</text:span></text:p>
          <text:p text:style-name="P5"><text:span text:style-name="T9"/></text:p>
        </draw:line>
        <draw:line draw:style-name="gr32" draw:text-style-name="P15" draw:layer="layout" svg:x1="43.383cm" svg:y1="29.127cm" svg:x2="43.383cm" svg:y2="32.031cm">
          <text:p text:style-name="P5"><text:span text:style-name="T9">602 <text:s text:c="15"/></text:span></text:p>
          <text:p text:style-name="P5"><text:span text:style-name="T9"/></text:p>
        </draw:line>
        <draw:line draw:style-name="gr33" draw:text-style-name="P19" draw:layer="layout" svg:x1="43.383cm" svg:y1="32.031cm" svg:x2="43.383cm" svg:y2="33.758cm">
          <text:p text:style-name="P8"><text:span text:style-name="T11">1658AM</text:span></text:p>
          <text:p text:style-name="P8"><text:span text:style-name="T11"/></text:p>
        </draw:line>
        <draw:line draw:style-name="gr34" draw:text-style-name="P5" draw:layer="layout" svg:x1="43.383cm" svg:y1="31.315cm" svg:x2="44.653cm" svg:y2="31.315cm">
          <text:p text:style-name="P5">100</text:p>
          <text:p text:style-name="P5"/>
        </draw:line>
        <draw:line draw:style-name="gr35" draw:text-style-name="P1" draw:layer="layout" svg:x1="42.383cm" svg:y1="31.315cm" svg:x2="43.335cm" svg:y2="31.315cm">
          <text:p text:style-name="P5">98</text:p>
          <text:p text:style-name="P5"/>
        </draw:line>
        <draw:line draw:style-name="gr31" draw:text-style-name="P15" draw:layer="layout" svg:x1="52.223cm" svg:y1="29.127cm" svg:x2="52.223cm" svg:y2="30.443cm">
          <text:p text:style-name="P5"><text:span text:style-name="T9"/></text:p>
          <text:p text:style-name="P5"><text:span text:style-name="T9">448</text:span></text:p>
        </draw:line>
        <draw:custom-shape draw:style-name="gr36" draw:text-style-name="P7" draw:layer="layout" svg:width="11.125cm" svg:height="1.588cm" svg:x="43.383cm" svg:y="33.758cm">
          <text:p text:style-name="P6"><text:span text:style-name="T5">Arphaxa</text:span><text:span text:style-name="T5">d</text:span></text:p>
          <text:p text:style-name="P6"><text:span text:style-name="T5">438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44.272cm" svg:y1="35.346cm" svg:x2="44.272cm" svg:y2="36.159cm">
          <text:p text:style-name="P5"><text:span text:style-name="T9">35</text:span></text:p>
          <text:p text:style-name="P5"><text:span text:style-name="T9"/></text:p>
        </draw:line>
        <draw:custom-shape draw:style-name="gr36" draw:text-style-name="P7" draw:layer="layout" svg:width="11.125cm" svg:height="1.588cm" svg:x="44.272cm" svg:y="36.159cm">
          <text:p text:style-name="P6"><text:span text:style-name="T5">Salah</text:span></text:p>
          <text:p text:style-name="P6"><text:span text:style-name="T5">433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40.843cm" svg:y1="29.127cm" svg:x2="40.843cm" svg:y2="30.443cm">
          <text:p text:style-name="P5"><text:span text:style-name="T9">502</text:span></text:p>
          <text:p text:style-name="P5"><text:span text:style-name="T9"/></text:p>
        </draw:line>
        <draw:line draw:style-name="gr37" draw:text-style-name="P15" draw:layer="layout" svg:x1="45.034cm" svg:y1="37.747cm" svg:x2="45.034cm" svg:y2="38.509cm">
          <text:p text:style-name="P5"><text:span text:style-name="T9">30</text:span></text:p>
          <text:p text:style-name="P5"><text:span text:style-name="T9"/></text:p>
        </draw:line>
        <draw:custom-shape draw:style-name="gr38" draw:text-style-name="P7" draw:layer="layout" svg:width="11.786cm" svg:height="1.588cm" svg:x="45.034cm" svg:y="38.509cm">
          <text:p text:style-name="P6"><text:span text:style-name="T5">Eber</text:span></text:p>
          <text:p text:style-name="P6"><text:span text:style-name="T5">464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layout" svg:x1="45.898cm" svg:y1="40.097cm" svg:x2="45.898cm" svg:y2="40.859cm">
          <text:p text:style-name="P5"><text:span text:style-name="T9">34</text:span></text:p>
          <text:p text:style-name="P5"><text:span text:style-name="T9"/></text:p>
        </draw:line>
        <draw:custom-shape draw:style-name="gr39" draw:text-style-name="P7" draw:layer="layout" svg:width="6.071cm" svg:height="1.588cm" svg:x="45.898cm" svg:y="40.859cm">
          <text:p text:style-name="P6"><text:span text:style-name="T5">Peleg</text:span></text:p>
          <text:p text:style-name="P6"><text:span text:style-name="T5">239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layout" svg:x1="46.66cm" svg:y1="42.447cm" svg:x2="46.66cm" svg:y2="43.209cm">
          <text:p text:style-name="P5"><text:span text:style-name="T9">30</text:span></text:p>
          <text:p text:style-name="P5"><text:span text:style-name="T9"/></text:p>
        </draw:line>
        <draw:custom-shape draw:style-name="gr39" draw:text-style-name="P7" draw:layer="layout" svg:width="6.071cm" svg:height="1.588cm" svg:x="46.66cm" svg:y="43.209cm">
          <text:p text:style-name="P6"><text:span text:style-name="T5">Reu</text:span></text:p>
          <text:p text:style-name="P6"><text:span text:style-name="T5">239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layout" svg:x1="47.473cm" svg:y1="44.797cm" svg:x2="47.473cm" svg:y2="45.559cm">
          <text:p text:style-name="P5"><text:span text:style-name="T9">32</text:span></text:p>
          <text:p text:style-name="P5"><text:span text:style-name="T9"/></text:p>
        </draw:line>
        <draw:custom-shape draw:style-name="gr40" draw:text-style-name="P7" draw:layer="layout" svg:width="5.842cm" svg:height="1.588cm" svg:x="47.473cm" svg:y="45.559cm">
          <text:p text:style-name="P6"><text:span text:style-name="T5">Serug</text:span></text:p>
          <text:p text:style-name="P6"><text:span text:style-name="T5">230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layout" svg:x1="48.235cm" svg:y1="47.147cm" svg:x2="48.235cm" svg:y2="47.909cm">
          <text:p text:style-name="P5"><text:span text:style-name="T9">30</text:span></text:p>
          <text:p text:style-name="P5"><text:span text:style-name="T9"/></text:p>
        </draw:line>
        <draw:custom-shape draw:style-name="gr41" draw:text-style-name="P7" draw:layer="layout" svg:width="3.759cm" svg:height="1.588cm" svg:x="48.235cm" svg:y="47.909cm">
          <text:p text:style-name="P6"><text:span text:style-name="T5">Nahor</text:span></text:p>
          <text:p text:style-name="P6"><text:span text:style-name="T5">148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layout" svg:x1="48.971cm" svg:y1="49.497cm" svg:x2="48.971cm" svg:y2="50.259cm">
          <text:p text:style-name="P5"><text:span text:style-name="T9">29</text:span></text:p>
          <text:p text:style-name="P5"><text:span text:style-name="T9"/></text:p>
        </draw:line>
        <draw:custom-shape draw:style-name="gr42" draw:text-style-name="P7" draw:layer="layout" svg:width="5.207cm" svg:height="1.588cm" svg:x="48.971cm" svg:y="50.259cm">
          <text:p text:style-name="P6"><text:span text:style-name="T5">Terah</text:span></text:p>
          <text:p text:style-name="P6"><text:span text:style-name="T5">205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layout" svg:x1="50.749cm" svg:y1="51.847cm" svg:x2="50.749cm" svg:y2="52.609cm">
          <text:p text:style-name="P5"><text:span text:style-name="T9">70</text:span></text:p>
          <text:p text:style-name="P5"><text:span text:style-name="T9"/></text:p>
        </draw:line>
        <draw:custom-shape draw:style-name="gr43" draw:text-style-name="P7" draw:layer="layout" svg:width="4.445cm" svg:height="1.588cm" svg:x="50.749cm" svg:y="52.609cm">
          <text:p text:style-name="P6"><text:span text:style-name="T5">Abram/</text:span><text:span text:style-name="T5">Abraha</text:span><text:span text:style-name="T5">m</text:span></text:p>
          <text:p text:style-name="P6"><text:span text:style-name="T5">175</text:span></text:p>
          <draw:enhanced-geometry svg:viewBox="0 0 21600 21600" draw:type="rectangle" draw:enhanced-path="M 0 0 L 21600 0 21600 21600 0 21600 0 0 Z N"/>
        </draw:custom-shape>
        <draw:line draw:style-name="gr44" draw:text-style-name="P19" draw:layer="layout" svg:x1="50.749cm" svg:y1="54.197cm" svg:x2="50.749cm" svg:y2="55.924cm">
          <text:p text:style-name="P8"><text:span text:style-name="T12">19</text:span><text:span text:style-name="T12">48</text:span><text:span text:style-name="T11">A</text:span><text:span text:style-name="T11">M</text:span></text:p>
          <text:p text:style-name="P8"><text:span text:style-name="T11"/></text:p>
        </draw:line>
        <draw:line draw:style-name="gr18" draw:text-style-name="P15" draw:layer="layout" svg:x1="4.572cm" svg:y1="6.374cm" svg:x2="4.572cm" svg:y2="7.949cm">
          <text:p text:style-name="P5"><text:span text:style-name="T9">130AM</text:span></text:p>
          <text:p text:style-name="P5"><text:span text:style-name="T9"/></text:p>
        </draw:line>
        <draw:line draw:style-name="gr18" draw:text-style-name="P15" draw:layer="layout" svg:x1="7.239cm" svg:y1="9.232cm" svg:x2="7.239cm" svg:y2="10.959cm">
          <text:p text:style-name="P5"><text:span text:style-name="T9">235AM</text:span></text:p>
          <text:p text:style-name="P5"><text:span text:style-name="T9"/></text:p>
        </draw:line>
        <draw:line draw:style-name="gr18" draw:text-style-name="P15" draw:layer="layout" svg:x1="9.525cm" svg:y1="12.09cm" svg:x2="9.525cm" svg:y2="13.817cm">
          <text:p text:style-name="P5"><text:span text:style-name="T9">325AM</text:span></text:p>
          <text:p text:style-name="P5"><text:span text:style-name="T9"/></text:p>
        </draw:line>
        <draw:line draw:style-name="gr18" draw:text-style-name="P15" draw:layer="layout" svg:x1="11.303cm" svg:y1="14.928cm" svg:x2="11.303cm" svg:y2="16.655cm">
          <text:p text:style-name="P5"><text:span text:style-name="T9">395AM</text:span></text:p>
          <text:p text:style-name="P5"><text:span text:style-name="T9"/></text:p>
        </draw:line>
        <draw:line draw:style-name="gr18" draw:text-style-name="P15" draw:layer="layout" svg:x1="12.954cm" svg:y1="17.786cm" svg:x2="12.954cm" svg:y2="19.513cm">
          <text:p text:style-name="P5"><text:span text:style-name="T9">460AM</text:span></text:p>
          <text:p text:style-name="P5"><text:span text:style-name="T9"/></text:p>
        </draw:line>
        <draw:line draw:style-name="gr18" draw:text-style-name="P15" draw:layer="layout" svg:x1="17.069cm" svg:y1="20.644cm" svg:x2="17.069cm" svg:y2="22.371cm">
          <text:p text:style-name="P5"><text:span text:style-name="T9">622AM</text:span></text:p>
          <text:p text:style-name="P5"><text:span text:style-name="T9"/></text:p>
        </draw:line>
        <draw:line draw:style-name="gr18" draw:text-style-name="P15" draw:layer="layout" svg:x1="18.72cm" svg:y1="23.502cm" svg:x2="18.72cm" svg:y2="25.229cm">
          <text:p text:style-name="P5"><text:span text:style-name="T9">687AM</text:span></text:p>
          <text:p text:style-name="P5"><text:span text:style-name="T9"/></text:p>
        </draw:line>
        <draw:line draw:style-name="gr18" draw:text-style-name="P15" draw:layer="layout" svg:x1="23.47cm" svg:y1="26.262cm" svg:x2="23.47cm" svg:y2="27.989cm">
          <text:p text:style-name="P5"><text:span text:style-name="T9">874A</text:span><text:span text:style-name="T9">M</text:span></text:p>
          <text:p text:style-name="P5"><text:span text:style-name="T9"/></text:p>
        </draw:line>
        <draw:line draw:style-name="gr18" draw:text-style-name="P15" draw:layer="layout" svg:x1="28.093cm" svg:y1="29.127cm" svg:x2="28.093cm" svg:y2="30.956cm">
          <text:p text:style-name="P5"><text:span text:style-name="T9">1056AM</text:span></text:p>
          <text:p text:style-name="P5"><text:span text:style-name="T9"/></text:p>
        </draw:line>
        <draw:line draw:style-name="gr18" draw:text-style-name="P15" draw:layer="layout" svg:x1="40.843cm" svg:y1="32.031cm" svg:x2="40.843cm" svg:y2="33.86cm">
          <text:p text:style-name="P5"><text:span text:style-name="T9">1558AM</text:span></text:p>
          <text:p text:style-name="P5"><text:span text:style-name="T9"/></text:p>
        </draw:line>
        <draw:line draw:style-name="gr18" draw:text-style-name="P15" draw:layer="layout" svg:x1="44.272cm" svg:y1="37.747cm" svg:x2="44.272cm" svg:y2="39.576cm">
          <text:p text:style-name="P5"><text:span text:style-name="T9">16</text:span><text:span text:style-name="T9">93</text:span><text:span text:style-name="T9">A</text:span><text:span text:style-name="T9">M</text:span></text:p>
          <text:p text:style-name="P5"><text:span text:style-name="T9"/></text:p>
        </draw:line>
        <draw:line draw:style-name="gr18" draw:text-style-name="P15" draw:layer="layout" svg:x1="45.034cm" svg:y1="40.097cm" svg:x2="45.034cm" svg:y2="41.926cm">
          <text:p text:style-name="P5"><text:span text:style-name="T9">1723AM</text:span></text:p>
          <text:p text:style-name="P5"><text:span text:style-name="T9"/></text:p>
        </draw:line>
        <draw:line draw:style-name="gr18" draw:text-style-name="P15" draw:layer="layout" svg:x1="45.898cm" svg:y1="42.447cm" svg:x2="45.898cm" svg:y2="44.276cm">
          <text:p text:style-name="P5"><text:span text:style-name="T9">1757AM</text:span></text:p>
          <text:p text:style-name="P5"><text:span text:style-name="T9"/></text:p>
        </draw:line>
        <draw:line draw:style-name="gr18" draw:text-style-name="P15" draw:layer="layout" svg:x1="46.66cm" svg:y1="44.797cm" svg:x2="46.66cm" svg:y2="46.626cm">
          <text:p text:style-name="P5"><text:span text:style-name="T9">1787</text:span><text:span text:style-name="T9">AM</text:span></text:p>
          <text:p text:style-name="P5"><text:span text:style-name="T9"/></text:p>
        </draw:line>
        <draw:line draw:style-name="gr18" draw:text-style-name="P15" draw:layer="layout" svg:x1="47.473cm" svg:y1="47.147cm" svg:x2="47.473cm" svg:y2="48.976cm">
          <text:p text:style-name="P5"><text:span text:style-name="T9">1819</text:span><text:span text:style-name="T9">AM</text:span></text:p>
          <text:p text:style-name="P5"><text:span text:style-name="T9"/></text:p>
        </draw:line>
        <draw:line draw:style-name="gr18" draw:text-style-name="P15" draw:layer="layout" svg:x1="48.235cm" svg:y1="49.497cm" svg:x2="48.235cm" svg:y2="51.326cm">
          <text:p text:style-name="P5"><text:span text:style-name="T9">1849AM</text:span></text:p>
          <text:p text:style-name="P5"><text:span text:style-name="T9"/></text:p>
        </draw:line>
        <draw:line draw:style-name="gr18" draw:text-style-name="P15" draw:layer="layout" svg:x1="48.971cm" svg:y1="51.847cm" svg:x2="48.971cm" svg:y2="53.676cm">
          <text:p text:style-name="P5"><text:span text:style-name="T9">1878</text:span><text:span text:style-name="T9">AM</text:span></text:p>
          <text:p text:style-name="P5"><text:span text:style-name="T9"/></text:p>
        </draw:line>
        <draw:line draw:style-name="gr31" draw:text-style-name="P15" draw:layer="layout" svg:x1="56.083cm" svg:y1="28.411cm" svg:x2="56.083cm" svg:y2="30.443cm">
          <text:p text:style-name="P5"><text:span text:style-name="T9">21</text:span><text:span text:style-name="T9">58</text:span><text:span text:style-name="T9">A</text:span><text:span text:style-name="T9">M</text:span></text:p>
          <text:p text:style-name="P5"><text:span text:style-name="T9"/></text:p>
        </draw:line>
        <draw:line draw:style-name="gr31" draw:text-style-name="P4" draw:layer="layout" svg:x1="54.508cm" svg:y1="32.132cm" svg:x2="54.508cm" svg:y2="33.758cm">
          <text:p text:style-name="P5"><text:span text:style-name="T6">2096AM</text:span></text:p>
          <text:p text:style-name="P5"><text:span text:style-name="T6"/></text:p>
        </draw:line>
        <draw:line draw:style-name="gr31" draw:text-style-name="P15" draw:layer="layout" svg:x1="55.397cm" svg:y1="34.127cm" svg:x2="55.397cm" svg:y2="36.159cm">
          <text:p text:style-name="P5"><text:span text:style-name="T9">2131AM</text:span></text:p>
          <text:p text:style-name="P5"><text:span text:style-name="T9"/></text:p>
        </draw:line>
        <draw:line draw:style-name="gr31" draw:text-style-name="P15" draw:layer="layout" svg:x1="56.82cm" svg:y1="36.477cm" svg:x2="56.82cm" svg:y2="38.509cm">
          <text:p text:style-name="P5"><text:span text:style-name="T9">2187AM</text:span></text:p>
          <text:p text:style-name="P5"><text:span text:style-name="T9"/></text:p>
        </draw:line>
        <draw:line draw:style-name="gr31" draw:text-style-name="P15" draw:layer="layout" svg:x1="52.731cm" svg:y1="41.177cm" svg:x2="52.731cm" svg:y2="43.209cm">
          <text:p text:style-name="P5"><text:span text:style-name="T9">2026AM</text:span></text:p>
          <text:p text:style-name="P5"><text:span text:style-name="T9"/></text:p>
        </draw:line>
        <draw:line draw:style-name="gr31" draw:text-style-name="P15" draw:layer="layout" svg:x1="53.315cm" svg:y1="43.527cm" svg:x2="53.315cm" svg:y2="45.559cm">
          <text:p text:style-name="P5"><text:span text:style-name="T9">2049AM</text:span></text:p>
          <text:p text:style-name="P5"><text:span text:style-name="T9"/></text:p>
        </draw:line>
        <draw:line draw:style-name="gr31" draw:text-style-name="P15" draw:layer="layout" svg:x1="54.178cm" svg:y1="48.227cm" svg:x2="54.178cm" svg:y2="50.259cm">
          <text:p text:style-name="P5"><text:span text:style-name="T9">2083AM</text:span></text:p>
          <text:p text:style-name="P5"><text:span text:style-name="T9"/></text:p>
        </draw:line>
        <draw:line draw:style-name="gr31" draw:text-style-name="P15" draw:layer="layout" svg:x1="55.194cm" svg:y1="50.577cm" svg:x2="55.194cm" svg:y2="52.609cm">
          <text:p text:style-name="P5"><text:span text:style-name="T9">2123AM</text:span></text:p>
          <text:p text:style-name="P5"><text:span text:style-name="T9"/></text:p>
        </draw:line>
        <draw:line draw:style-name="gr30" draw:text-style-name="P5" draw:layer="layout" svg:x1="51.969cm" svg:y1="40.862cm" svg:x2="56.82cm" svg:y2="40.862cm">
          <text:p text:style-name="P5">1996AM</text:p>
          <text:p text:style-name="P5">191</text:p>
        </draw:line>
        <draw:line draw:style-name="gr30" draw:text-style-name="P5" draw:layer="layout" svg:x1="51.994cm" svg:y1="47.909cm" svg:x2="54.356cm" svg:y2="47.909cm">
          <text:p text:style-name="P5">1997AM</text:p>
          <text:p text:style-name="P5"/>
        </draw:line>
        <draw:line draw:style-name="gr45" draw:text-style-name="P20" draw:layer="layout" svg:x1="52.653cm" svg:y1="57.109cm" svg:x2="52.653cm" svg:y2="54.198cm">
          <text:p text:style-name="P8"><text:span text:style-name="T13">2023AM (75)</text:span></text:p>
          <text:p text:style-name="P8"><text:span text:style-name="T13"/></text:p>
        </draw:line>
        <draw:line draw:style-name="gr46" draw:text-style-name="P19" draw:layer="layout" svg:x1="52.654cm" svg:y1="59.46cm" svg:x2="52.654cm" svg:y2="58.698cm">
          <text:p text:style-name="P8"><text:span text:style-name="T11">65</text:span></text:p>
          <text:p text:style-name="P8"><text:span text:style-name="T11"/></text:p>
        </draw:line>
        <draw:line draw:style-name="gr10" draw:text-style-name="P15" draw:layer="layout" svg:x1="53.721cm" svg:y1="55.229cm" svg:x2="53.721cm" svg:y2="57.109cm">
          <text:p text:style-name="P5"><text:span text:style-name="T9">20</text:span><text:span text:style-name="T9">65</text:span><text:span text:style-name="T9">AM</text:span></text:p>
          <text:p text:style-name="P5"><text:span text:style-name="T9"/></text:p>
        </draw:line>
        <draw:line draw:style-name="gr47" draw:text-style-name="P21" draw:layer="layout" svg:x1="52.908cm" svg:y1="56.94cm" svg:x2="52.908cm" svg:y2="54.197cm">
          <text:p text:style-name="P8"><text:span text:style-name="T14">2033</text:span><text:span text:style-name="T14">AM </text:span><text:span text:style-name="T14">(85) </text:span><text:span text:style-name="T14">Gen </text:span><text:span text:style-name="T14">16:3</text:span></text:p>
          <text:p text:style-name="P8"><text:span text:style-name="T14"/></text:p>
        </draw:line>
        <draw:custom-shape draw:style-name="gr48" draw:text-style-name="P7" draw:layer="layout" svg:width="3.48cm" svg:height="1.588cm" svg:x="52.934cm" svg:y="60.092cm">
          <text:p text:style-name="P6"><text:span text:style-name="T5">Ishmael</text:span></text:p>
          <text:p text:style-name="P6"><text:span text:style-name="T5">137</text:span></text:p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4.572cm" svg:height="1.588cm" svg:x="53.289cm" svg:y="63.488cm">
          <text:p text:style-name="P6"><text:span text:style-name="T5">Isaa</text:span><text:span text:style-name="T5">c</text:span></text:p>
          <text:p text:style-name="P6"><text:span text:style-name="T5">180</text:span></text:p>
          <draw:enhanced-geometry svg:viewBox="0 0 21600 21600" draw:type="rectangle" draw:enhanced-path="M 0 0 L 21600 0 21600 21600 0 21600 0 0 Z N"/>
        </draw:custom-shape>
        <draw:line draw:style-name="gr50" draw:text-style-name="P15" draw:layer="layout" svg:x1="50.495cm" svg:y1="58.697cm" svg:x2="50.495cm" svg:y2="60.526cm">
          <text:p text:style-name="P5"><text:span text:style-name="T9">1938AM</text:span></text:p>
          <text:p text:style-name="P5"><text:span text:style-name="T9"/></text:p>
        </draw:line>
        <draw:line draw:style-name="gr50" draw:text-style-name="P22" draw:layer="layout" svg:x1="52.934cm" svg:y1="61.68cm" svg:x2="52.934cm" svg:y2="63.488cm">
          <text:p text:style-name="P5"><text:span text:style-name="T15">20</text:span><text:span text:style-name="T15">34</text:span><text:span text:style-name="T15">A</text:span><text:span text:style-name="T15">M</text:span></text:p>
          <text:p text:style-name="P5"><text:span text:style-name="T15"/></text:p>
        </draw:line>
        <draw:line draw:style-name="gr50" draw:text-style-name="P15" draw:layer="layout" svg:x1="53.289cm" svg:y1="65.076cm" svg:x2="53.289cm" svg:y2="67.006cm">
          <text:p text:style-name="P5"><text:span text:style-name="T9">204</text:span><text:span text:style-name="T9">8A</text:span><text:span text:style-name="T9">M</text:span></text:p>
          <text:p text:style-name="P5"><text:span text:style-name="T9"/></text:p>
        </draw:line>
        <draw:line draw:style-name="gr10" draw:text-style-name="P15" draw:layer="layout" svg:x1="56.414cm" svg:y1="58.212cm" svg:x2="56.414cm" svg:y2="60.092cm">
          <text:p text:style-name="P5"><text:span text:style-name="T9">21</text:span><text:span text:style-name="T9">71</text:span><text:span text:style-name="T9">A</text:span><text:span text:style-name="T9">M</text:span></text:p>
          <text:p text:style-name="P5"><text:span text:style-name="T9"/></text:p>
        </draw:line>
        <draw:line draw:style-name="gr10" draw:text-style-name="P15" draw:layer="layout" svg:x1="57.861cm" svg:y1="61.68cm" svg:x2="57.861cm" svg:y2="63.488cm">
          <text:p text:style-name="P5"><text:span text:style-name="T9">2228AM</text:span></text:p>
          <text:p text:style-name="P5"><text:span text:style-name="T9"/></text:p>
        </draw:line>
        <draw:line draw:style-name="gr6" draw:text-style-name="P10" draw:layer="layout" svg:x1="52.934cm" svg:y1="63.488cm" svg:x2="53.289cm" svg:y2="63.488cm">
          <text:p text:style-name="P5"><text:span text:style-name="T2"/></text:p>
          <text:p text:style-name="P5"><text:span text:style-name="T2">1</text:span><text:span text:style-name="T2">4</text:span></text:p>
        </draw:line>
        <draw:line draw:style-name="gr6" draw:text-style-name="P1" draw:layer="layout" svg:x1="56.414cm" svg:y1="61.68cm" svg:x2="57.861cm" svg:y2="61.68cm">
          <text:p text:style-name="P5"/>
          <text:p text:style-name="P5">57</text:p>
        </draw:line>
        <draw:line draw:style-name="gr6" draw:text-style-name="P1" draw:layer="layout" svg:x1="53.721cm" svg:y1="58.697cm" svg:x2="56.414cm" svg:y2="58.697cm">
          <text:p text:style-name="P5"/>
          <text:p text:style-name="P5">106</text:p>
        </draw:line>
        <draw:line draw:style-name="gr5" draw:text-style-name="P1" draw:layer="layout" svg:x1="55.194cm" svg:y1="54.148cm" svg:x2="55.194cm" svg:y2="57.109cm">
          <text:p/>
        </draw:line>
        <draw:line draw:style-name="gr6" draw:text-style-name="P1" draw:layer="layout" svg:x1="53.721cm" svg:y1="57.109cm" svg:x2="55.194cm" svg:y2="57.109cm">
          <text:p text:style-name="P5"/>
          <text:p text:style-name="P5">58</text:p>
        </draw:line>
        <draw:line draw:style-name="gr6" draw:text-style-name="P1" draw:layer="layout" svg:x1="54.178cm" svg:y1="51.847cm" svg:x2="55.194cm" svg:y2="51.847cm">
          <text:p text:style-name="P5"/>
          <text:p text:style-name="P5">40</text:p>
        </draw:line>
        <draw:line draw:style-name="gr6" draw:text-style-name="P1" draw:layer="layout" svg:x1="51.994cm" svg:y1="49.497cm" svg:x2="54.178cm" svg:y2="49.497cm">
          <text:p text:style-name="P5"/>
          <text:p text:style-name="P5">86</text:p>
        </draw:line>
        <draw:line draw:style-name="gr6" draw:text-style-name="P1" draw:layer="layout" svg:x1="51.994cm" svg:y1="48.426cm" svg:x2="53.315cm" svg:y2="48.426cm">
          <text:p text:style-name="P5"/>
          <text:p text:style-name="P5">52</text:p>
        </draw:line>
        <draw:line draw:style-name="gr6" draw:text-style-name="P1" draw:layer="layout" svg:x1="52.731cm" svg:y1="44.797cm" svg:x2="53.315cm" svg:y2="44.797cm">
          <text:p text:style-name="P5"/>
          <text:p text:style-name="P5">23</text:p>
        </draw:line>
        <draw:line draw:style-name="gr6" draw:text-style-name="P1" draw:layer="layout" svg:x1="51.969cm" svg:y1="42.447cm" svg:x2="52.731cm" svg:y2="42.447cm">
          <text:p text:style-name="P5"/>
          <text:p text:style-name="P5">30</text:p>
        </draw:line>
        <draw:line draw:style-name="gr5" draw:text-style-name="P1" draw:layer="layout" svg:x1="56.82cm" svg:y1="40.097cm" svg:x2="56.82cm" svg:y2="40.862cm">
          <text:p/>
        </draw:line>
        <draw:line draw:style-name="gr6" draw:text-style-name="P1" draw:layer="layout" svg:x1="55.397cm" svg:y1="37.747cm" svg:x2="56.82cm" svg:y2="37.747cm">
          <text:p text:style-name="P5"/>
          <text:p text:style-name="P5">56</text:p>
        </draw:line>
        <draw:line draw:style-name="gr6" draw:text-style-name="P1" draw:layer="layout" svg:x1="54.508cm" svg:y1="35.346cm" svg:x2="55.397cm" svg:y2="35.346cm">
          <text:p text:style-name="P5"/>
          <text:p text:style-name="P5">35</text:p>
        </draw:line>
        <draw:line draw:style-name="gr5" draw:text-style-name="P1" draw:layer="layout" svg:x1="56.083cm" svg:y1="32.031cm" svg:x2="56.083cm" svg:y2="33.758cm">
          <text:p/>
        </draw:line>
        <draw:line draw:style-name="gr6" draw:text-style-name="P4" draw:layer="layout" svg:x1="54.508cm" svg:y1="33.758cm" svg:x2="56.083cm" svg:y2="33.758cm">
          <text:p text:style-name="P5"><text:span text:style-name="T6"/></text:p>
          <text:p text:style-name="P5"><text:span text:style-name="T6">62</text:span></text:p>
        </draw:line>
        <draw:line draw:style-name="gr6" draw:text-style-name="P1" draw:layer="layout" svg:x1="52.223cm" svg:y1="29.128cm" svg:x2="56.083cm" svg:y2="29.128cm">
          <text:p text:style-name="P5"/>
          <text:p text:style-name="P5">152</text:p>
        </draw:line>
        <draw:line draw:style-name="gr6" draw:text-style-name="P1" draw:layer="layout" svg:x1="43.206cm" svg:y1="26.262cm" svg:x2="52.222cm" svg:y2="26.262cm">
          <text:p text:style-name="P5"/>
          <text:p text:style-name="P5">355</text:p>
        </draw:line>
        <draw:line draw:style-name="gr50" draw:text-style-name="P1" draw:layer="layout" svg:x1="40.287cm" svg:y1="6.433cm" svg:x2="43.335cm" svg:y2="6.434cm">
          <text:p text:style-name="P5">1536AM</text:p>
          <text:p text:style-name="P5">Gen 6:3</text:p>
        </draw:line>
        <draw:custom-shape draw:style-name="gr51" draw:text-style-name="P3" draw:layer="layout" svg:width="7.62cm" svg:height="4.922cm" svg:x="46.672cm" svg:y="4.587cm">
          <text:p text:style-name="P2"><text:span text:style-name="T2">Jehoiada the priest (</text:span><text:span text:style-name="T4">2Ch 24:15</text:span><text:span text:style-name="T2">) lived to 130 (~1,500 yrs after the flood)</text:span></text:p>
          <text:p text:style-name="P2"><text:span text:style-name="T2"/></text:p>
          <text:p text:style-name="P2"><text:span text:style-name="T2">Since the late 1800s only one person as been verified to live beyond 120 years</text:span></text:p>
          <text:p text:style-name="P2"><text:span text:style-name="T2">(Jeanne Calment; 122 yrs 164 days; died in 1997). </text:span></text:p>
          <text:p text:style-name="P2"><text:span text:style-name="T2"/></text:p>
          <text:p text:style-name="P2"><text:span text:style-name="T2">Since 1997, there has been no one verified to have lived over 120 years.</text:span></text:p>
          <text:p text:style-name="P2"><text:span text:style-name="T2"/></text:p>
          <text:p text:style-name="P2"><text:span text:style-name="T2">So, either God was talking about something that would happen ~4,344 yrs in the future or He was referring to there being 120 yrs until the flood as is supposed here.</text:span></text:p>
          <draw:enhanced-geometry svg:viewBox="0 0 21600 21600" draw:text-areas="800 800 20800 20800" draw:type="round-rectangular-callout" draw:modifiers="-9463.6399422648 8095.0639853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6" draw:text-style-name="P1" draw:layer="layout" svg:x1="37.375cm" svg:y1="20.769cm" svg:x2="40.287cm" svg:y2="20.769cm">
          <text:p text:style-name="P5"/>
          <text:p text:style-name="P5">115</text:p>
        </draw:line>
        <draw:line draw:style-name="gr6" draw:text-style-name="P1" draw:layer="layout" svg:x1="40.286cm" svg:y1="21.914cm" svg:x2="40.286cm" svg:y2="23.502cm">
          <text:p text:style-name="P5">850</text:p>
          <text:p text:style-name="P5"/>
        </draw:line>
        <draw:line draw:style-name="gr6" draw:text-style-name="P1" draw:layer="layout" svg:x1="40.286cm" svg:y1="24.674cm" svg:x2="40.286cm" svg:y2="26.262cm">
          <text:p text:style-name="P5">662</text:p>
          <text:p text:style-name="P5"/>
        </draw:line>
        <draw:line draw:style-name="gr6" draw:text-style-name="P1" draw:layer="layout" svg:x1="40.286cm" svg:y1="27.54cm" svg:x2="40.286cm" svg:y2="29.127cm">
          <text:p text:style-name="P5">480</text:p>
          <text:p text:style-name="P5"/>
        </draw:line>
        <draw:line draw:style-name="gr6" draw:text-style-name="P4" draw:layer="layout" svg:x1="40.286cm" svg:y1="30.443cm" svg:x2="40.843cm" svg:y2="30.443cm">
          <text:p text:style-name="P5"><text:span text:style-name="T6"/></text:p>
          <text:p text:style-name="P5"><text:span text:style-name="T6">22</text:span></text:p>
        </draw:line>
        <draw:line draw:style-name="gr37" draw:text-style-name="P15" draw:layer="layout" svg:x1="54.813cm" svg:y1="65.076cm" svg:x2="54.813cm" svg:y2="65.838cm">
          <text:p text:style-name="P5"><text:span text:style-name="T9">60</text:span></text:p>
          <text:p text:style-name="P5"><text:span text:style-name="T9"/></text:p>
        </draw:line>
        <draw:line draw:style-name="gr5" draw:text-style-name="P1" draw:layer="layout" svg:x1="54.813cm" svg:y1="67.426cm" svg:x2="54.813cm" svg:y2="68.696cm">
          <text:p/>
        </draw:line>
        <draw:line draw:style-name="gr37" draw:text-style-name="P15" draw:layer="layout" svg:x1="54.305cm" svg:y1="65.076cm" svg:x2="54.305cm" svg:y2="69.496cm">
          <text:p text:style-name="P5"><text:span text:style-name="T9">40 </text:span><text:span text:style-name="T9">(marri</text:span><text:span text:style-name="T9">ed </text:span><text:span text:style-name="T9">Rebek</text:span><text:span text:style-name="T9">ah)</text:span></text:p>
          <text:p text:style-name="P5"><text:span text:style-name="T9"/></text:p>
        </draw:line>
        <draw:line draw:style-name="gr10" draw:text-style-name="P15" draw:layer="layout" svg:x1="58.547cm" svg:y1="64.03cm" svg:x2="58.547cm" svg:y2="65.838cm">
          <text:p text:style-name="P5"><text:span text:style-name="T9">2255AM</text:span></text:p>
          <text:p text:style-name="P5"><text:span text:style-name="T9"/></text:p>
        </draw:line>
        <draw:line draw:style-name="gr10" draw:text-style-name="P10" draw:layer="layout" svg:x1="58.115cm" svg:y1="64.03cm" svg:x2="58.115cm" svg:y2="65.838cm">
          <text:p text:style-name="P5"><text:span text:style-name="T2">2238AM</text:span></text:p>
          <text:p text:style-name="P5"><text:span text:style-name="T10">Gen 47:28</text:span></text:p>
        </draw:line>
        <draw:custom-shape draw:style-name="gr52" draw:text-style-name="P3" draw:layer="layout" svg:width="2.944cm" svg:height="1.725cm" svg:x="58.948cm" svg:y="67.843cm">
          <text:p text:style-name="P2"><text:span text:style-name="T2">There is no record </text:span><text:span text:style-name="T2">of Esau’s lifespan </text:span><text:span text:style-name="T2">after the burial of </text:span><text:span text:style-name="T2">Isaac (</text:span><text:span text:style-name="T4">Gen 35:29</text:span><text:span text:style-name="T2">)</text:span></text:p>
          <draw:enhanced-geometry svg:viewBox="0 0 21600 21600" draw:text-areas="800 800 20800 20800" draw:type="round-rectangular-callout" draw:modifiers="-7950.56027164686 21274.6234067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5" draw:text-style-name="P1" draw:layer="layout" svg:x1="58.547cm" svg:y1="67.426cm" svg:x2="58.547cm" svg:y2="68.696cm">
          <text:p/>
        </draw:line>
        <draw:line draw:style-name="gr6" draw:text-style-name="P1" draw:layer="layout" svg:x1="57.861cm" svg:y1="68.696cm" svg:x2="58.547cm" svg:y2="68.696cm">
          <text:p text:style-name="P5">27</text:p>
          <text:p text:style-name="P5"/>
        </draw:line>
        <draw:line draw:style-name="gr50" draw:text-style-name="P15" draw:layer="layout" svg:x1="54.813cm" svg:y1="70.284cm" svg:x2="54.813cm" svg:y2="72.214cm">
          <text:p text:style-name="P5"><text:span text:style-name="T9">2</text:span><text:span text:style-name="T9">1</text:span><text:span text:style-name="T9">0</text:span><text:span text:style-name="T9">8</text:span><text:span text:style-name="T9">A</text:span><text:span text:style-name="T9">M</text:span></text:p>
          <text:p text:style-name="P5"><text:span text:style-name="T9"/></text:p>
        </draw:line>
        <draw:line draw:style-name="gr6" draw:text-style-name="P1" draw:layer="layout" svg:x1="58.115cm" svg:y1="64.03cm" svg:x2="58.547cm" svg:y2="64.03cm">
          <text:p text:style-name="P5"><text:span text:style-name="T6">17</text:span></text:p>
          <text:p text:style-name="P5"/>
        </draw:line>
        <draw:line draw:style-name="gr13" draw:text-style-name="P1" draw:layer="layout" svg:x1="56.413cm" svg:y1="61.681cm" svg:x2="56.413cm" svg:y2="63.488cm">
          <text:p/>
        </draw:line>
        <draw:line draw:style-name="gr6" draw:text-style-name="P1" draw:layer="layout" svg:x1="56.414cm" svg:y1="63.488cm" svg:x2="56.414cm" svg:y2="65.076cm">
          <text:p text:style-name="P5">123</text:p>
          <text:p text:style-name="P5"/>
        </draw:line>
        <draw:line draw:style-name="gr53" draw:text-style-name="P15" draw:layer="layout" svg:x1="56.414cm" svg:y1="65.076cm" svg:x2="56.414cm" svg:y2="65.838cm">
          <text:p text:style-name="P5"><text:span text:style-name="T9">63</text:span></text:p>
          <text:p text:style-name="P5"><text:span text:style-name="T9"/></text:p>
        </draw:line>
        <draw:line draw:style-name="gr6" draw:text-style-name="P1" draw:layer="layout" svg:x1="58.115cm" svg:y1="65.838cm" svg:x2="58.115cm" svg:y2="67.426cm">
          <text:p text:style-name="P5">130</text:p>
          <text:p text:style-name="P5"/>
        </draw:line>
        <draw:line draw:style-name="gr8" draw:text-style-name="P1" draw:layer="layout" svg:x1="58.115cm" svg:y1="73.46cm" svg:x2="69.037cm" svg:y2="73.459cm">
          <text:p text:style-name="P5"/>
          <text:p text:style-name="P5">430</text:p>
        </draw:line>
        <draw:line draw:style-name="gr54" draw:text-style-name="P23" draw:layer="layout" svg:x1="69.037cm" svg:y1="71.123cm" svg:x2="69.037cm" svg:y2="73.46cm">
          <text:p text:style-name="P8">2668.04AM</text:p>
          <text:p text:style-name="P5">Exodus</text:p>
        </draw:line>
        <draw:line draw:style-name="gr55" draw:text-style-name="P1" draw:layer="layout" svg:x1="69.037cm" svg:y1="73.459cm" svg:x2="70.104cm" svg:y2="73.459cm">
          <text:p text:style-name="P5"/>
          <text:p text:style-name="P5">41</text:p>
        </draw:line>
        <draw:custom-shape draw:style-name="gr56" draw:text-style-name="P3" draw:layer="layout" svg:width="4.956cm" svg:height="2.695cm" svg:x="63.58cm" svg:y="67.472cm">
          <text:p text:style-name="P2"><text:span text:style-name="T7">Fro</text:span><text:span text:style-name="T7">m </text:span><text:span text:style-name="T7">the </text:span><text:span text:style-name="T7">day </text:span><text:span text:style-name="T7">the</text:span><text:span text:style-name="T7">y </text:span><text:span text:style-name="T7">exit</text:span><text:span text:style-name="T7">ed </text:span><text:span text:style-name="T7">Egy</text:span><text:span text:style-name="T7">pt </text:span><text:span text:style-name="T7">(1</text:span><text:span text:style-name="T16">st</text:span><text:span text:style-name="T7"> </text:span><text:span text:style-name="T7">yea</text:span><text:span text:style-name="T7">r, </text:span><text:span text:style-name="T7">1</text:span><text:span text:style-name="T16">st</text:span><text:span text:style-name="T7"> </text:span><text:span text:style-name="T7">mo</text:span><text:span text:style-name="T7">nth</text:span><text:span text:style-name="T7">, </text:span><text:span text:style-name="T7">15</text:span><text:span text:style-name="T16">th</text:span><text:span text:style-name="T7"> </text:span><text:span text:style-name="T7">day</text:span><text:span text:style-name="T7">) to </text:span><text:span text:style-name="T7">the </text:span><text:span text:style-name="T7">day </text:span><text:span text:style-name="T7">the</text:span><text:span text:style-name="T7">y </text:span><text:span text:style-name="T7">cro</text:span><text:span text:style-name="T7">sse</text:span><text:span text:style-name="T7">d </text:span><text:span text:style-name="T7">the </text:span><text:span text:style-name="T7">Jor</text:span><text:span text:style-name="T7">dan </text:span><text:span text:style-name="T7">(</text:span><text:span text:style-name="T2">43</text:span><text:span text:style-name="T3">r</text:span><text:span text:style-name="T3">d</text:span><text:span text:style-name="T2"> </text:span><text:span text:style-name="T2">yea</text:span><text:span text:style-name="T2">r, </text:span><text:span text:style-name="T2">1</text:span><text:span text:style-name="T3">st</text:span><text:span text:style-name="T2"> </text:span><text:span text:style-name="T2">mo</text:span><text:span text:style-name="T2">nth</text:span><text:span text:style-name="T2">, </text:span><text:span text:style-name="T2">10</text:span><text:span text:style-name="T3">th</text:span><text:span text:style-name="T2"> </text:span><text:span text:style-name="T2">day</text:span><text:span text:style-name="T2">) </text:span><text:span text:style-name="T2">wa</text:span><text:span text:style-name="T2">s </text:span><text:span text:style-name="T2">exa</text:span><text:span text:style-name="T2">ctly </text:span><text:span text:style-name="T2">15,</text:span><text:span text:style-name="T2">115 </text:span><text:span text:style-name="T2">day</text:span><text:span text:style-name="T2">s or</text:span></text:p>
          <text:p text:style-name="P2"><text:span text:style-name="T2">41 </text:span><text:span text:style-name="T2">yea</text:span><text:span text:style-name="T2">rs, </text:span><text:span text:style-name="T2">11 </text:span><text:span text:style-name="T2">mo</text:span><text:span text:style-name="T2">nth</text:span><text:span text:style-name="T2">s, </text:span><text:span text:style-name="T2">25 </text:span><text:span text:style-name="T2">day</text:span><text:span text:style-name="T2">s</text:span></text:p>
          <text:p text:style-name="P2"><text:span text:style-name="T2">(</text:span><text:span text:style-name="T4">Nu</text:span><text:span text:style-name="T4">m </text:span><text:span text:style-name="T4">33:</text:span><text:span text:style-name="T4">3</text:span><text:span text:style-name="T2">→</text:span><text:span text:style-name="T4">Jos </text:span><text:span text:style-name="T4">4:1</text:span><text:span text:style-name="T4">9</text:span><text:span text:style-name="T2">)</text:span></text:p>
          <draw:enhanced-geometry svg:viewBox="0 0 21600 21600" draw:text-areas="800 800 20800 20800" draw:type="round-rectangular-callout" draw:modifiers="23765.6647165624 29299.4065281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6" draw:text-style-name="P1" draw:layer="layout" svg:x1="69.037cm" svg:y1="74.683cm" svg:x2="81.229cm" svg:y2="74.683cm">
          <text:p text:style-name="P5">1Ki 6:1</text:p>
          <text:p text:style-name="P5">480</text:p>
        </draw:line>
        <draw:line draw:style-name="gr57" draw:text-style-name="P1" draw:layer="layout" svg:x1="81.229cm" svg:y1="69.095cm" svg:x2="81.229cm" svg:y2="74.683cm">
          <text:p text:style-name="P5">3149AM</text:p>
          <text:p text:style-name="P5">Temple construction begins</text:p>
        </draw:line>
        <draw:line draw:style-name="gr8" draw:text-style-name="P10" draw:layer="layout" svg:x1="81.229cm" svg:y1="74.683cm" svg:x2="81.407cm" svg:y2="74.683cm">
          <text:p text:style-name="P5"><text:span text:style-name="T2"/></text:p>
          <text:p text:style-name="P5"><text:span text:style-name="T2">7</text:span></text:p>
        </draw:line>
        <draw:line draw:style-name="gr54" draw:text-style-name="P1" draw:layer="layout" svg:x1="81.407cm" svg:y1="74.683cm" svg:x2="81.407cm" svg:y2="80.423cm">
          <text:p text:style-name="P5">3156AM</text:p>
          <text:p text:style-name="P5">Temple construction ends</text:p>
        </draw:line>
        <draw:line draw:style-name="gr6" draw:text-style-name="P4" draw:layer="layout" svg:x1="81.407cm" svg:y1="74.683cm" svg:x2="81.737cm" svg:y2="74.683cm">
          <text:p text:style-name="P5"><text:span text:style-name="T2">13</text:span></text:p>
          <text:p text:style-name="P5"><text:span text:style-name="T6"/></text:p>
        </draw:line>
        <draw:line draw:style-name="gr54" draw:text-style-name="P4" draw:layer="layout" svg:x1="81.737cm" svg:y1="71.076cm" svg:x2="81.737cm" svg:y2="74.683cm">
          <text:p text:style-name="P5"><text:span text:style-name="T6">3169AM </text:span><text:span text:style-name="T6">King’s </text:span><text:span text:style-name="T6">house</text:span></text:p>
          <text:p text:style-name="P5"><text:span text:style-name="T6"/></text:p>
        </draw:line>
        <draw:custom-shape draw:style-name="gr58" draw:text-style-name="P25" draw:layer="layout" svg:width="13.301cm" svg:height="8.766cm" svg:x="81.914cm" svg:y="58.762cm">
          <text:p text:style-name="P24"><text:span text:style-name="T17">Extra-</text:span><text:span text:style-name="T17">Biblical </text:span><text:span text:style-name="T17">sources </text:span><text:span text:style-name="T17">and </text:span><text:span text:style-name="T17">assumpt</text:span><text:span text:style-name="T17">ions are </text:span><text:span text:style-name="T17">needed </text:span><text:span text:style-name="T17">to go </text:span><text:span text:style-name="T17">any </text:span><text:span text:style-name="T17">further </text:span><text:span text:style-name="T17">(eg. </text:span><text:span text:style-name="T18">Ezekiel </text:span><text:span text:style-name="T18">4:5</text:span><text:span text:style-name="T17">) </text:span><text:span text:style-name="T17">simply </text:span><text:span text:style-name="T17">because </text:span><text:span text:style-name="T17">the </text:span><text:span text:style-name="T17">Bible </text:span><text:span text:style-name="T17">does </text:span><text:span text:style-name="T17">not tell </text:span><text:span text:style-name="T17">us </text:span><text:span text:style-name="T17">precisel</text:span><text:span text:style-name="T17">y when </text:span><text:span text:style-name="T17">several </text:span><text:span text:style-name="T17">kings </text:span><text:span text:style-name="T17">began </text:span><text:span text:style-name="T17">to reign </text:span><text:span text:style-name="T17">relative </text:span><text:span text:style-name="T17">to each </text:span><text:span text:style-name="T17">other, </text:span><text:span text:style-name="T17">starting </text:span><text:span text:style-name="T17">with </text:span><text:span text:style-name="T17">both </text:span><text:span text:style-name="T17">Jeroboa</text:span><text:span text:style-name="T17">m and </text:span><text:span text:style-name="T17">Rehobo</text:span><text:span text:style-name="T17">am </text:span><text:span text:style-name="T17">relative </text:span><text:span text:style-name="T17">to </text:span><text:span text:style-name="T17">Solomo</text:span><text:span text:style-name="T17">n (we </text:span><text:span text:style-name="T17">would </text:span><text:span text:style-name="T17">have to </text:span><text:span text:style-name="T18">assume</text:span><text:span text:style-name="T17"> </text:span><text:span text:style-name="T17">that </text:span><text:span text:style-name="T17">they </text:span><text:span text:style-name="T17">both </text:span><text:span text:style-name="T17">began </text:span><text:span text:style-name="T17">to reign </text:span><text:span text:style-name="T17">the </text:span><text:span text:style-name="T17">same </text:span><text:span text:style-name="T17">year </text:span><text:span text:style-name="T17">that </text:span><text:span text:style-name="T17">Solomo</text:span><text:span text:style-name="T17">n died </text:span><text:span text:style-name="T17">which </text:span><text:span text:style-name="T19">seems</text:span><text:span text:style-name="T17"> </text:span><text:span text:style-name="T17">logical </text:span><text:span text:style-name="T17">but the </text:span><text:span text:style-name="T17">fact </text:span><text:span text:style-name="T17">remains </text:span><text:span text:style-name="T18">the </text:span><text:span text:style-name="T18">Bible </text:span><text:span text:style-name="T18">does </text:span><text:span text:style-name="T18">not tell </text:span><text:span text:style-name="T18">us </text:span><text:span text:style-name="T18">that</text:span><text:span text:style-name="T17">).</text:span></text:p>
          <text:p text:style-name="P24"><text:span text:style-name="T17"/></text:p>
          <text:p text:style-name="P24"><text:span text:style-name="T18">2Ki </text:span><text:span text:style-name="T18">14:29</text:span><text:span text:style-name="T17"> </text:span><text:span text:style-name="T17">might </text:span><text:span text:style-name="T17">make us </text:span><text:span text:style-name="T17">think </text:span><text:span text:style-name="T17">that </text:span><text:span text:style-name="T17">Zacharia</text:span><text:span text:style-name="T17">h began </text:span><text:span text:style-name="T17">to reign </text:span><text:span text:style-name="T17">the </text:span><text:span text:style-name="T17">same </text:span><text:span text:style-name="T17">year </text:span><text:span text:style-name="T17">that </text:span><text:span text:style-name="T17">Jeroboa</text:span><text:span text:style-name="T17">m II </text:span><text:span text:style-name="T17">died. </text:span><text:span text:style-name="T17">But, </text:span><text:span text:style-name="T17">when </text:span><text:span text:style-name="T17">we put </text:span><text:span text:style-name="T17">all the </text:span><text:span text:style-name="T17">data </text:span><text:span text:style-name="T17">from </text:span><text:span text:style-name="T17">the </text:span><text:span text:style-name="T17">Bible </text:span><text:span text:style-name="T17">togethe</text:span><text:span text:style-name="T17">r there </text:span><text:span text:style-name="T17">is a 24 </text:span><text:span text:style-name="T17">year </text:span><text:span text:style-name="T17">gap </text:span><text:span text:style-name="T17">betwee</text:span><text:span text:style-name="T17">n the </text:span><text:span text:style-name="T17">end of </text:span><text:span text:style-name="T17">Jeroboa</text:span><text:span text:style-name="T17">m II’s </text:span><text:span text:style-name="T17">reign </text:span><text:span text:style-name="T17">and the </text:span><text:span text:style-name="T17">beginni</text:span><text:span text:style-name="T17">ng of </text:span><text:span text:style-name="T17">Zacharia</text:span><text:span text:style-name="T17">h’s </text:span><text:span text:style-name="T17">reign.</text:span></text:p>
          <text:p text:style-name="P24"><text:span text:style-name="T17"/></text:p>
          <text:p text:style-name="P24"><text:span text:style-name="T17">King </text:span><text:span text:style-name="T17">Hezekia</text:span><text:span text:style-name="T17">h’s reign </text:span><text:span text:style-name="T17">began 8 </text:span><text:span text:style-name="T17">years </text:span><text:span text:style-name="T17">before </text:span><text:span text:style-name="T17">the end </text:span><text:span text:style-name="T17">of his </text:span><text:span text:style-name="T17">father </text:span><text:span text:style-name="T17">king </text:span><text:span text:style-name="T17">Ahaz’s </text:span><text:span text:style-name="T17">reign </text:span><text:span text:style-name="T17">but the </text:span><text:span text:style-name="T17">text </text:span><text:span text:style-name="T17">might </text:span><text:span text:style-name="T17">make us </text:span><text:span text:style-name="T17">think </text:span><text:span text:style-name="T17">otherwi</text:span><text:span text:style-name="T17">se (</text:span><text:span text:style-name="T18">2Ki </text:span><text:span text:style-name="T18">16:20</text:span><text:span text:style-name="T17">).</text:span></text:p>
          <text:p text:style-name="P24"><text:span text:style-name="T17"/></text:p>
          <text:p text:style-name="P24"><text:span text:style-name="T17">A more </text:span><text:span text:style-name="T17">complex </text:span><text:span text:style-name="T17">example </text:span><text:span text:style-name="T17">is king </text:span><text:span text:style-name="T17">Omri. </text:span><text:span text:style-name="T17">He was </text:span><text:span text:style-name="T17">made </text:span><text:span text:style-name="T17">king </text:span><text:span text:style-name="T17">(</text:span><text:span text:style-name="T18">1Ki </text:span><text:span text:style-name="T18">16:16</text:span><text:span text:style-name="T17">) </text:span><text:span text:style-name="T17">but his </text:span><text:span text:style-name="T17">reign </text:span><text:span text:style-name="T17">did not </text:span><text:span text:style-name="T17">begin </text:span><text:span text:style-name="T17">until 4 </text:span><text:span text:style-name="T17">years </text:span><text:span text:style-name="T17">later </text:span><text:span text:style-name="T17">(</text:span><text:span text:style-name="T18">1Ki </text:span><text:span text:style-name="T18">16:23</text:span><text:span text:style-name="T17">) </text:span><text:span text:style-name="T17">which </text:span><text:span text:style-name="T17">was 3 </text:span><text:span text:style-name="T17">years </text:span><text:span text:style-name="T17">after </text:span><text:span text:style-name="T17">the end </text:span><text:span text:style-name="T17">of Elah’s </text:span><text:span text:style-name="T17">reign.</text:span></text:p>
          <text:p text:style-name="P24"><text:span text:style-name="T17"/></text:p>
          <text:p text:style-name="P24"><text:span text:style-name="T17">All of </text:span><text:span text:style-name="T17">these </text:span><text:span text:style-name="T17">example</text:span><text:span text:style-name="T17">s serve </text:span><text:span text:style-name="T17">to show </text:span><text:span text:style-name="T17">us that </text:span><text:span text:style-name="T17">making </text:span><text:span text:style-name="T17">assumpt</text:span><text:span text:style-name="T17">ions </text:span><text:span text:style-name="T17">based </text:span><text:span text:style-name="T17">on what </text:span><text:span text:style-name="T17">we </text:span><text:span text:style-name="T17">think </text:span><text:span text:style-name="T17">the text </text:span><text:span text:style-name="T17">says is a </text:span><text:span text:style-name="T17">very </text:span><text:span text:style-name="T17">easy </text:span><text:span text:style-name="T17">way to </text:span><text:span text:style-name="T17">stray </text:span><text:span text:style-name="T17">from </text:span><text:span text:style-name="T17">the path </text:span><text:span text:style-name="T17">we are </text:span><text:span text:style-name="T17">given.</text:span></text:p>
          <text:p text:style-name="P24"><text:span text:style-name="T17"/></text:p>
          <text:p text:style-name="P24"><text:span text:style-name="T17">See the </text:span><text:span text:style-name="T17">chart </text:span><text:span text:style-name="T17">“Kings </text:span><text:span text:style-name="T17">of </text:span><text:span text:style-name="T17">Judah &amp; </text:span><text:span text:style-name="T17">Israel </text:span><text:span text:style-name="T17">timeline</text:span><text:span text:style-name="T17">” for </text:span><text:span text:style-name="T17">more </text:span><text:span text:style-name="T17">details </text:span><text:span text:style-name="T17">and all </text:span><text:span text:style-name="T17">the </text:span><text:span text:style-name="T17">referenc</text:span><text:span text:style-name="T17">es for </text:span><text:span text:style-name="T17">the </text:span><text:span text:style-name="T17">example</text:span><text:span text:style-name="T17">s given.</text:span></text:p>
          <draw:enhanced-geometry svg:viewBox="0 0 21600 21600" draw:text-areas="800 800 20800 20800" draw:type="round-rectangular-callout" draw:modifiers="-254.939106901218 30287.3046652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59" draw:text-style-name="P7" draw:layer="layout" svg:width="2.794cm" svg:height="1.588cm" svg:x="57.125cm" svg:y="75.249cm">
          <text:p text:style-name="P6"><text:span text:style-name="T5"><text:s text:c="8"/>Joseph</text:span></text:p>
          <text:p text:style-name="P6"><text:span text:style-name="T5"><text:s text:c="8"/>110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8.115cm" svg:y1="76.837cm" svg:x2="58.115cm" svg:y2="75.249cm">
          <text:p text:style-name="P5">39</text:p>
          <text:p text:style-name="P5"/>
        </draw:line>
        <draw:line draw:style-name="gr60" draw:text-style-name="P26" draw:layer="layout" svg:x1="58.064cm" svg:y1="74.857cm" svg:x2="58.115cm" svg:y2="74.857cm">
          <text:p text:style-name="P5"><text:span text:style-name="T20"/></text:p>
          <text:p text:style-name="P5"><text:span text:style-name="T20">2</text:span></text:p>
        </draw:line>
        <draw:line draw:style-name="gr61" draw:text-style-name="P27" draw:layer="layout" svg:x1="57.886cm" svg:y1="74.857cm" svg:x2="58.064cm" svg:y2="74.857cm">
          <text:p text:style-name="P5"><text:span text:style-name="T20"/></text:p>
          <text:p text:style-name="P5"><text:span text:style-name="T20">7</text:span></text:p>
        </draw:line>
        <draw:line draw:style-name="gr6" draw:text-style-name="P28" draw:layer="layout" svg:x1="57.124cm" svg:y1="74.857cm" svg:x2="57.886cm" svg:y2="74.857cm">
          <text:p text:style-name="P5"><text:span text:style-name="T21"/></text:p>
          <text:p text:style-name="P5"><text:span text:style-name="T21">30</text:span></text:p>
        </draw:line>
        <draw:custom-shape draw:style-name="gr62" draw:text-style-name="P3" draw:layer="layout" svg:width="4.772cm" svg:height="2.481cm" svg:x="51.912cm" svg:y="75.121cm">
          <text:p text:style-name="P2"><text:span text:style-name="T2">30 when he </text:span><text:span text:style-name="T2">stood before </text:span><text:span text:style-name="T2">Pharaoh (</text:span><text:span text:style-name="T4">Gen </text:span><text:span text:style-name="T4">41:46</text:span><text:span text:style-name="T2">)</text:span></text:p>
          <text:p text:style-name="P2"><text:span text:style-name="T2"/></text:p>
          <text:p text:style-name="P2"><text:span text:style-name="T2">7 years of </text:span><text:span text:style-name="T2">plenty (</text:span><text:span text:style-name="T4">Gen </text:span><text:span text:style-name="T4">41:47-53</text:span><text:span text:style-name="T2">)</text:span></text:p>
          <text:p text:style-name="P2"><text:span text:style-name="T2"/></text:p>
          <text:p text:style-name="P2"><text:span text:style-name="T2">2 years of </text:span><text:span text:style-name="T2">famine (</text:span><text:span text:style-name="T4">Gen </text:span><text:span text:style-name="T4">45:6</text:span><text:span text:style-name="T2">)</text:span></text:p>
          <draw:enhanced-geometry svg:viewBox="0 0 21600 21600" draw:text-areas="800 800 20800 20800" draw:type="round-rectangular-callout" draw:modifiers="23604.7768698932 -2184.36744560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50" draw:text-style-name="P15" draw:layer="layout" svg:x1="57.125cm" svg:y1="76.837cm" svg:x2="57.125cm" svg:y2="78.767cm">
          <text:p text:style-name="P5"><text:span text:style-name="T9">2199AM</text:span></text:p>
          <text:p text:style-name="P5"><text:span text:style-name="T9"/></text:p>
        </draw:line>
        <draw:line draw:style-name="gr63" draw:text-style-name="P1" draw:layer="layout" svg:x1="57.125cm" svg:y1="67.426cm" svg:x2="57.125cm" svg:y2="75.249cm">
          <text:p/>
        </draw:line>
        <draw:custom-shape draw:style-name="gr64" draw:text-style-name="P7" draw:layer="layout" svg:width="3.048cm" svg:height="1.588cm" svg:x="54.813cm" svg:y="68.696cm">
          <text:p text:style-name="P6"><text:span text:style-name="T5">Es</text:span><text:span text:style-name="T5">au</text:span></text:p>
          <text:p text:style-name="P6"><text:span text:style-name="T5">12</text:span><text:span text:style-name="T5">0+</text:span></text:p>
          <draw:enhanced-geometry svg:viewBox="0 0 21600 21600" draw:type="rectangle" draw:enhanced-path="M 0 0 L 21600 0 21600 21600 0 21600 0 0 Z N"/>
        </draw:custom-shape>
        <draw:line draw:style-name="gr65" draw:text-style-name="P19" draw:layer="layout" svg:x1="57.125cm" svg:y1="65.838cm" svg:x2="57.125cm" svg:y2="67.426cm">
          <text:p text:style-name="P8"><text:span text:style-name="T11">91</text:span></text:p>
          <text:p text:style-name="P8"><text:span text:style-name="T11"/></text:p>
        </draw:line>
        <draw:line draw:style-name="gr50" draw:text-style-name="P15" draw:layer="layout" svg:x1="59.919cm" svg:y1="76.837cm" svg:x2="59.919cm" svg:y2="78.767cm">
          <text:p text:style-name="P5"><text:span text:style-name="T9">23</text:span><text:span text:style-name="T9">09</text:span><text:span text:style-name="T9">A</text:span><text:span text:style-name="T9">M</text:span></text:p>
          <text:p text:style-name="P5"><text:span text:style-name="T9"/></text:p>
        </draw:line>
        <draw:line draw:style-name="gr5" draw:text-style-name="P1" draw:layer="layout" svg:x1="57.886cm" svg:y1="74.614cm" svg:x2="57.886cm" svg:y2="75.249cm">
          <text:p/>
        </draw:line>
        <draw:line draw:style-name="gr5" draw:text-style-name="P1" draw:layer="layout" svg:x1="58.063cm" svg:y1="74.614cm" svg:x2="58.063cm" svg:y2="75.249cm">
          <text:p/>
        </draw:line>
        <draw:line draw:style-name="gr6" draw:text-style-name="P1" draw:layer="layout" svg:x1="43.335cm" svg:y1="36.159cm" svg:x2="44.272cm" svg:y2="36.159cm">
          <text:p text:style-name="P5"/>
          <text:p text:style-name="P5">37</text:p>
        </draw:line>
        <draw:line draw:style-name="gr6" draw:text-style-name="P1" draw:layer="layout" svg:x1="43.335cm" svg:y1="40.855cm" svg:x2="45.898cm" svg:y2="40.855cm">
          <text:p text:style-name="P5"/>
          <text:p text:style-name="P5">101 <text:s text:c="15"/></text:p>
        </draw:line>
        <draw:line draw:style-name="gr6" draw:text-style-name="P1" draw:layer="layout" svg:x1="43.335cm" svg:y1="52.625cm" svg:x2="50.749cm" svg:y2="52.626cm">
          <text:p text:style-name="P5"/>
          <text:p text:style-name="P5">292 <text:s text:c="63"/></text:p>
        </draw:line>
        <draw:line draw:style-name="gr6" draw:text-style-name="P1" draw:layer="layout" svg:x1="43.332cm" svg:y1="57.109cm" svg:x2="50.495cm" svg:y2="57.109cm">
          <text:p text:style-name="P5"/>
          <text:p text:style-name="P5">282 <text:s text:c="61"/></text:p>
        </draw:line>
        <draw:line draw:style-name="gr6" draw:text-style-name="P1" draw:layer="layout" svg:x1="43.332cm" svg:y1="65.067cm" svg:x2="53.289cm" svg:y2="65.066cm">
          <text:p text:style-name="P5"/>
          <text:p text:style-name="P5">392 <text:s text:c="88"/></text:p>
        </draw:line>
        <draw:line draw:style-name="gr6" draw:text-style-name="P1" draw:layer="layout" svg:x1="43.332cm" svg:y1="67.433cm" svg:x2="54.813cm" svg:y2="67.433cm">
          <text:p text:style-name="P5"/>
          <text:p text:style-name="P5">452 <text:s text:c="104"/></text:p>
        </draw:line>
        <draw:line draw:style-name="gr6" draw:text-style-name="P1" draw:layer="layout" svg:x1="43.335cm" svg:y1="70.284cm" svg:x2="54.816cm" svg:y2="70.284cm">
          <text:p text:style-name="P5"/>
          <text:p text:style-name="P5">452 <text:s text:c="104"/></text:p>
        </draw:line>
        <draw:custom-shape draw:style-name="gr66" draw:text-style-name="P29" draw:layer="layout" svg:width="0.538cm" svg:height="0.505cm" svg:x="42.007cm" svg:y="33.47cm">
          <text:p text:style-name="P5">2</text:p>
          <draw:enhanced-geometry svg:viewBox="0 0 21600 21600" draw:text-areas="800 800 20800 20800" draw:type="round-rectangular-callout" draw:modifiers="50493.5064935065 11781.81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67" draw:text-style-name="P5" draw:layer="layout" svg:x1="43.294cm" svg:y1="33.758cm" svg:x2="43.345cm" svg:y2="33.758cm">
          <text:p/>
        </draw:line>
        <draw:custom-shape draw:style-name="gr68" draw:text-style-name="P31" draw:layer="layout" svg:width="3.048cm" svg:height="1.588cm" svg:x="67.005cm" svg:y="75.967cm">
          <text:p text:style-name="P30"><text:span text:style-name="T22">Moses</text:span></text:p>
          <text:p text:style-name="P30"><text:span text:style-name="T22">120</text:span></text:p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67.005cm" svg:y1="73.46cm" svg:x2="67.005cm" svg:y2="75.967cm">
          <text:p text:style-name="P5">2588AM</text:p>
          <text:p text:style-name="P5"/>
        </draw:line>
        <draw:line draw:style-name="gr57" draw:text-style-name="P1" draw:layer="layout" svg:x1="67.005cm" svg:y1="72.441cm" svg:x2="67.005cm" svg:y2="73.457cm">
          <text:p text:style-name="P5">350</text:p>
          <text:p text:style-name="P5"/>
        </draw:line>
        <draw:custom-shape draw:style-name="gr69" draw:text-style-name="P3" draw:layer="layout" svg:width="5.572cm" svg:height="1.046cm" svg:x="71.016cm" svg:y="73.178cm">
          <text:p text:style-name="P2"><text:span text:style-name="T4">Deu 1:3</text:span><text:span text:style-name="T23"> (40</text:span><text:span text:style-name="T24">th</text:span><text:span text:style-name="T23"> year, 11</text:span><text:span text:style-name="T24">th</text:span><text:span text:style-name="T23"> month, 1</text:span><text:span text:style-name="T24">st</text:span><text:span text:style-name="T23"> day)</text:span></text:p>
          <text:p text:style-name="P2"><text:span text:style-name="T2">789 days (2 years, 2 months, 9 days)</text:span></text:p>
          <text:p text:style-name="P2"><text:span text:style-name="T25">Jos 4:19</text:span><text:span text:style-name="T7"> (43</text:span><text:span text:style-name="T16">rd</text:span><text:span text:style-name="T7"> year, </text:span><text:span text:style-name="T23">1</text:span><text:span text:style-name="T24">st</text:span><text:span text:style-name="T23"> month, 10</text:span><text:span text:style-name="T24">th</text:span><text:span text:style-name="T23"> day)</text:span></text:p>
          <draw:enhanced-geometry svg:viewBox="0 0 21600 21600" draw:text-areas="800 800 20800 20800" draw:type="round-rectangular-callout" draw:modifiers="-3639.40427059035 12089.3982808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50" draw:text-style-name="P15" draw:layer="layout" svg:x1="70.053cm" svg:y1="77.555cm" svg:x2="70.053cm" svg:y2="79.689cm">
          <text:p text:style-name="P5"><text:span text:style-name="T9">2708AM</text:span><text:span text:style-name="T26">*</text:span></text:p>
          <text:p text:style-name="P5"><text:span text:style-name="T9"/></text:p>
        </draw:line>
        <draw:line draw:style-name="gr50" draw:text-style-name="P4" draw:layer="layout" svg:x1="68.021cm" svg:y1="77.555cm" svg:x2="68.021cm" svg:y2="79.79cm">
          <text:p text:style-name="P5"><text:span text:style-name="T6">2628AM</text:span></text:p>
          <text:p text:style-name="P5"><text:span text:style-name="T6">Exo 2:11-15</text:span></text:p>
          <text:p text:style-name="P5"><text:span text:style-name="T6">Acts 7:23</text:span></text:p>
        </draw:line>
        <draw:line draw:style-name="gr50" draw:text-style-name="P4" draw:layer="layout" svg:x1="69.036cm" svg:y1="77.555cm" svg:x2="69.036cm" svg:y2="79.485cm">
          <text:p text:style-name="P5"><text:span text:style-name="T6">2668AM</text:span></text:p>
          <text:p text:style-name="P5"><text:span text:style-name="T6">Acts 7:30</text:span></text:p>
        </draw:line>
        <draw:line draw:style-name="gr57" draw:text-style-name="P1" draw:layer="layout" svg:x1="68.02cm" svg:y1="73.461cm" svg:x2="68.02cm" svg:y2="75.968cm">
          <text:p text:style-name="P5">2628AM</text:p>
          <text:p text:style-name="P5"/>
        </draw:line>
        <draw:line draw:style-name="gr57" draw:text-style-name="P1" draw:layer="layout" svg:x1="68.02cm" svg:y1="72.439cm" svg:x2="68.02cm" svg:y2="73.455cm">
          <text:p text:style-name="P5">390</text:p>
          <text:p text:style-name="P5"/>
        </draw:line>
        <draw:line draw:style-name="gr6" draw:text-style-name="P1" draw:layer="layout" svg:x1="69.038cm" svg:y1="75.967cm" svg:x2="69.038cm" svg:y2="77.555cm">
          <text:p text:style-name="P5">80</text:p>
          <text:p text:style-name="P5"/>
        </draw:line>
        <draw:line draw:style-name="gr6" draw:text-style-name="P1" draw:layer="layout" svg:x1="68.02cm" svg:y1="77.554cm" svg:x2="68.02cm" svg:y2="75.967cm">
          <text:p text:style-name="P5">40</text:p>
          <text:p text:style-name="P5"/>
        </draw:line>
        <draw:line draw:style-name="gr5" draw:text-style-name="P1" draw:layer="layout" svg:x1="69.036cm" svg:y1="75.047cm" svg:x2="69.036cm" svg:y2="75.967cm">
          <text:p/>
        </draw:line>
        <draw:custom-shape draw:style-name="gr70" draw:text-style-name="P25" draw:layer="layout" svg:width="4.304cm" svg:height="2.399cm" svg:x="59.372cm" svg:y="69.991cm">
          <text:p text:style-name="P24"><text:span text:style-name="T17">The exodus occurred on the 1</text:span><text:span text:style-name="T27">st</text:span><text:span text:style-name="T17"> month, 15</text:span><text:span text:style-name="T27">th</text:span><text:span text:style-name="T17"> day, 2668AM.</text:span></text:p>
          <text:p text:style-name="P24"><text:span text:style-name="T17">(</text:span><text:span text:style-name="T18">Num 33:3</text:span><text:span text:style-name="T17">)</text:span></text:p>
          <text:p text:style-name="P24"><text:span text:style-name="T17">Therefore, the sojourning in Egypt began on the</text:span></text:p>
          <text:p text:style-name="P24"><text:span text:style-name="T17">1</text:span><text:span text:style-name="T27">st</text:span><text:span text:style-name="T17"> month, 15</text:span><text:span text:style-name="T27">th</text:span><text:span text:style-name="T17"> day, 2238AM.</text:span></text:p>
          <text:p text:style-name="P24"><text:span text:style-name="T17">(</text:span><text:span text:style-name="T18">Exo 12:40,41</text:span><text:span text:style-name="T17">)</text:span></text:p>
          <draw:enhanced-geometry svg:viewBox="0 0 21600 21600" draw:text-areas="800 800 20800 20800" draw:type="round-rectangular-callout" draw:modifiers="-6226.62020905923 311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1" draw:text-style-name="P25" draw:layer="layout" svg:width="4.154cm" svg:height="0.886cm" svg:x="70.738cm" svg:y="68.946cm">
          <text:p text:style-name="P24"><text:span text:style-name="T18">Deu 1:3</text:span></text:p>
          <text:p text:style-name="P24"><text:span text:style-name="T17">40</text:span><text:span text:style-name="T27">th</text:span><text:span text:style-name="T17"> year, 11</text:span><text:span text:style-name="T27">th</text:span><text:span text:style-name="T17"> month, 1</text:span><text:span text:style-name="T27">st</text:span><text:span text:style-name="T17"> day</text:span></text:p>
          <draw:enhanced-geometry svg:viewBox="0 0 21600 21600" draw:text-areas="800 800 20800 20800" draw:type="round-rectangular-callout" draw:modifiers="-3555.81227436823 32582.6381059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2" draw:text-style-name="P25" draw:layer="layout" svg:width="5.303cm" svg:height="1.932cm" svg:x="71.532cm" svg:y="75.591cm">
          <text:p text:style-name="P24"><text:span text:style-name="T28">*</text:span><text:span text:style-name="T17">Moses is still alive in the 41</text:span><text:span text:style-name="T27">st</text:span><text:span text:style-name="T17"> year (he speaks of 40 years that have already past) and he died that same year before his 121</text:span><text:span text:style-name="T27">st</text:span><text:span text:style-name="T17"> birthday</text:span></text:p>
          <text:p text:style-name="P24"><text:span text:style-name="T18">Deu 2:7</text:span><text:span text:style-name="T17">, </text:span><text:span text:style-name="T18">8:2</text:span><text:span text:style-name="T29">,</text:span><text:span text:style-name="T18">4</text:span><text:span text:style-name="T17">, </text:span><text:span text:style-name="T18">29:5</text:span></text:p>
          <draw:enhanced-geometry svg:viewBox="0 0 21600 21600" draw:text-areas="800 800 20800 20800" draw:type="round-rectangular-callout" draw:modifiers="-6014.93212669683 -2905.32850491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3" draw:text-style-name="P25" draw:layer="layout" svg:width="6.119cm" svg:height="5.08cm" svg:x="68.536cm" svg:y="58.76cm">
          <text:p text:style-name="P24"><text:span text:style-name="T17">The 12 spies are sent from Kadesh-Barnea in the 2</text:span><text:span text:style-name="T27">nd</text:span><text:span text:style-name="T17"> year after the exodus.</text:span></text:p>
          <text:p text:style-name="P24"><text:span text:style-name="T17"/></text:p>
          <text:p text:style-name="P24"><text:span text:style-name="T17">The 40 year wandering judgment is decreed in the 2</text:span><text:span text:style-name="T27">nd</text:span><text:span text:style-name="T17"> year after the exodus (</text:span><text:span text:style-name="T18">Num 14</text:span><text:span text:style-name="T17">; ~4</text:span><text:span text:style-name="T27">th</text:span><text:span text:style-name="T17"> month, 26</text:span><text:span text:style-name="T27">th</text:span><text:span text:style-name="T17"> day; ~476 days after the day of the exodus)</text:span></text:p>
          <text:p text:style-name="P24"><text:span text:style-name="T17"/></text:p>
          <text:p text:style-name="P24"><text:span text:style-name="T17">Refer to the article “How long after the exodus did the Israelites enter Canaan?” for more details.</text:span></text:p>
          <draw:enhanced-geometry svg:viewBox="0 0 21600 21600" draw:text-areas="800 800 20800 20800" draw:type="round-rectangular-callout" draw:modifiers="1863.52941176471 28040.464475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74" draw:text-style-name="P10" draw:layer="layout" svg:x1="68.021cm" svg:y1="79.79cm" svg:x2="69.036cm" svg:y2="79.79cm">
          <text:p text:style-name="P5"><text:span text:style-name="T2"/></text:p>
          <text:p text:style-name="P5"><text:span text:style-name="T2">Midian</text:span></text:p>
        </draw:line>
        <draw:line draw:style-name="gr5" draw:text-style-name="P1" draw:layer="layout" svg:x1="69.036cm" svg:y1="79.485cm" svg:x2="69.036cm" svg:y2="79.79cm">
          <text:p/>
        </draw:line>
        <draw:line draw:style-name="gr57" draw:text-style-name="P23" draw:layer="layout" svg:x1="70.104cm" svg:y1="70.767cm" svg:x2="70.104cm" svg:y2="73.459cm">
          <text:p text:style-name="P8">2710.027AM</text:p>
          <text:p text:style-name="P5">Jordan</text:p>
        </draw:line>
        <draw:custom-shape draw:style-name="gr75" draw:text-style-name="P31" draw:layer="layout" svg:width="3.124cm" svg:height="1.588cm" svg:x="66.928cm" svg:y="80.385cm">
          <text:p text:style-name="P30"><text:span text:style-name="T22">Aaron</text:span></text:p>
          <text:p text:style-name="P30"><text:span text:style-name="T22">123</text:span></text:p>
          <draw:enhanced-geometry svg:viewBox="0 0 21600 21600" draw:type="rectangle" draw:enhanced-path="M 0 0 L 21600 0 21600 21600 0 21600 0 0 Z N"/>
        </draw:custom-shape>
        <draw:custom-shape draw:style-name="gr76" draw:text-style-name="P25" draw:layer="layout" svg:width="7.25cm" svg:height="1.678cm" svg:x="71.437cm" svg:y="79.69cm">
          <text:p text:style-name="P24"><text:span text:style-name="T17">M</text:span><text:span text:style-name="T17">o</text:span><text:span text:style-name="T17">s</text:span><text:span text:style-name="T17">e</text:span><text:span text:style-name="T17">s </text:span><text:span text:style-name="T17">w</text:span><text:span text:style-name="T17">a</text:span><text:span text:style-name="T17">s </text:span><text:span text:style-name="T17">8</text:span><text:span text:style-name="T17">0 </text:span><text:span text:style-name="T17">w</text:span><text:span text:style-name="T17">h</text:span><text:span text:style-name="T17">e</text:span><text:span text:style-name="T17">n </text:span><text:span text:style-name="T17">h</text:span><text:span text:style-name="T17">e </text:span><text:span text:style-name="T17">w</text:span><text:span text:style-name="T17">a</text:span><text:span text:style-name="T17">s </text:span><text:span text:style-name="T17">t</text:span><text:span text:style-name="T17">ol</text:span><text:span text:style-name="T17">d </text:span><text:span text:style-name="T17">t</text:span><text:span text:style-name="T17">o </text:span><text:span text:style-name="T17">r</text:span><text:span text:style-name="T17">e</text:span><text:span text:style-name="T17">t</text:span><text:span text:style-name="T17">u</text:span><text:span text:style-name="T17">r</text:span><text:span text:style-name="T17">n </text:span><text:span text:style-name="T17">t</text:span><text:span text:style-name="T17">o </text:span><text:span text:style-name="T17">E</text:span><text:span text:style-name="T17">g</text:span><text:span text:style-name="T17">y</text:span><text:span text:style-name="T17">p</text:span><text:span text:style-name="T17">t </text:span><text:span text:style-name="T17">a</text:span><text:span text:style-name="T17">n</text:span><text:span text:style-name="T17">d </text:span><text:span text:style-name="T17">w</text:span><text:span text:style-name="T17">h</text:span><text:span text:style-name="T17">e</text:span><text:span text:style-name="T17">n </text:span><text:span text:style-name="T17">h</text:span><text:span text:style-name="T17">e </text:span><text:span text:style-name="T17">st</text:span><text:span text:style-name="T17">o</text:span><text:span text:style-name="T17">o</text:span><text:span text:style-name="T17">d </text:span><text:span text:style-name="T17">b</text:span><text:span text:style-name="T17">e</text:span><text:span text:style-name="T17">f</text:span><text:span text:style-name="T17">o</text:span><text:span text:style-name="T17">r</text:span><text:span text:style-name="T17">e </text:span><text:span text:style-name="T17">P</text:span><text:span text:style-name="T17">h</text:span><text:span text:style-name="T17">a</text:span><text:span text:style-name="T17">r</text:span><text:span text:style-name="T17">a</text:span><text:span text:style-name="T17">o</text:span><text:span text:style-name="T17">h </text:span><text:span text:style-name="T17">(</text:span><text:span text:style-name="T18">E</text:span><text:span text:style-name="T18">x</text:span><text:span text:style-name="T18">o </text:span><text:span text:style-name="T18">7:</text:span><text:span text:style-name="T18">7</text:span><text:span text:style-name="T17">, </text:span><text:span text:style-name="T18">A</text:span><text:span text:style-name="T18">c</text:span><text:span text:style-name="T18">t</text:span><text:span text:style-name="T18">s </text:span><text:span text:style-name="T18">7:</text:span><text:span text:style-name="T18">3</text:span><text:span text:style-name="T18">0</text:span><text:span text:style-name="T29">)</text:span><text:span text:style-name="T29">. </text:span><text:span text:style-name="T17">In </text:span><text:span text:style-name="T17">o</text:span><text:span text:style-name="T17">r</text:span><text:span text:style-name="T17">d</text:span><text:span text:style-name="T17">e</text:span><text:span text:style-name="T17">r </text:span><text:span text:style-name="T17">f</text:span><text:span text:style-name="T17">o</text:span><text:span text:style-name="T17">r </text:span><text:span text:style-name="T17">M</text:span><text:span text:style-name="T17">o</text:span><text:span text:style-name="T17">s</text:span><text:span text:style-name="T17">e</text:span><text:span text:style-name="T17">s </text:span><text:span text:style-name="T17">t</text:span><text:span text:style-name="T17">o </text:span><text:span text:style-name="T17">le</text:span><text:span text:style-name="T17">a</text:span><text:span text:style-name="T17">d </text:span><text:span text:style-name="T17">t</text:span><text:span text:style-name="T17">h</text:span><text:span text:style-name="T17">e</text:span><text:span text:style-name="T17">m </text:span><text:span text:style-name="T17">f</text:span><text:span text:style-name="T17">o</text:span><text:span text:style-name="T17">r </text:span><text:span text:style-name="T17">4</text:span><text:span text:style-name="T17">0 </text:span><text:span text:style-name="T17">y</text:span><text:span text:style-name="T17">e</text:span><text:span text:style-name="T17">a</text:span><text:span text:style-name="T17">rs </text:span><text:span text:style-name="T17">t</text:span><text:span text:style-name="T17">h</text:span><text:span text:style-name="T17">e </text:span><text:span text:style-name="T17">e</text:span><text:span text:style-name="T17">x</text:span><text:span text:style-name="T17">o</text:span><text:span text:style-name="T17">d</text:span><text:span text:style-name="T17">u</text:span><text:span text:style-name="T17">s </text:span><text:span text:style-name="T17">h</text:span><text:span text:style-name="T17">a</text:span><text:span text:style-name="T17">d </text:span><text:span text:style-name="T17">t</text:span><text:span text:style-name="T17">o </text:span><text:span text:style-name="T17">o</text:span><text:span text:style-name="T17">c</text:span><text:span text:style-name="T17">c</text:span><text:span text:style-name="T17">u</text:span><text:span text:style-name="T17">r </text:span><text:span text:style-name="T17">t</text:span><text:span text:style-name="T17">h</text:span><text:span text:style-name="T17">e </text:span><text:span text:style-name="T17">s</text:span><text:span text:style-name="T17">a</text:span><text:span text:style-name="T17">m</text:span><text:span text:style-name="T17">e </text:span><text:span text:style-name="T17">y</text:span><text:span text:style-name="T17">e</text:span><text:span text:style-name="T17">ar</text:span><text:span text:style-name="T17">.</text:span></text:p>
          <draw:enhanced-geometry svg:viewBox="0 0 21600 21600" draw:text-areas="800 800 20800 20800" draw:type="round-rectangular-callout" draw:modifiers="-7113.61191559785 4850.02977963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5" draw:text-style-name="P1" draw:layer="layout" svg:x1="69.036cm" svg:y1="79.79cm" svg:x2="69.036cm" svg:y2="80.385cm">
          <text:p/>
        </draw:line>
        <draw:line draw:style-name="gr77" draw:text-style-name="P1" draw:layer="layout" svg:x1="66.928cm" svg:y1="80.384cm" svg:x2="66.928cm" svg:y2="78.403cm">
          <text:p text:style-name="P5">2585AM</text:p>
          <text:p text:style-name="P5"/>
        </draw:line>
        <draw:line draw:style-name="gr6" draw:text-style-name="P1" draw:layer="layout" svg:x1="69.036cm" svg:y1="80.385cm" svg:x2="69.036cm" svg:y2="81.973cm">
          <text:p text:style-name="P5">83</text:p>
          <text:p text:style-name="P5"/>
        </draw:line>
        <draw:line draw:style-name="gr50" draw:text-style-name="P15" draw:layer="layout" svg:x1="70.052cm" svg:y1="81.973cm" svg:x2="70.052cm" svg:y2="83.802cm">
          <text:p text:style-name="P5"><text:span text:style-name="T9">2708AM</text:span></text:p>
          <text:p text:style-name="P5"><text:span text:style-name="T9"/></text:p>
        </draw:line>
        <draw:custom-shape draw:style-name="gr78" draw:text-style-name="P31" draw:layer="layout" svg:width="2.159cm" svg:height="1.588cm" svg:x="68.047cm" svg:y="65.675cm">
          <text:p text:style-name="P30"><text:span text:style-name="T22"><text:s text:c="11"/>Caleb</text:span></text:p>
          <text:p text:style-name="P30"><text:span text:style-name="T22"><text:s text:c="11"/>85+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9.063cm" svg:y1="67.263cm" svg:x2="69.063cm" svg:y2="65.675cm">
          <text:p text:style-name="P5">40</text:p>
          <text:p text:style-name="P5"/>
        </draw:line>
        <draw:line draw:style-name="gr79" draw:text-style-name="P1" draw:layer="layout" svg:x1="70.206cm" svg:y1="69.143cm" svg:x2="70.206cm" svg:y2="73.459cm">
          <text:p/>
        </draw:line>
        <draw:line draw:style-name="gr50" draw:text-style-name="P15" draw:layer="layout" svg:x1="70.206cm" svg:y1="67.263cm" svg:x2="70.206cm" svg:y2="69.143cm">
          <text:p text:style-name="P5"><text:span text:style-name="T9">2714AM</text:span></text:p>
          <text:p text:style-name="P5"><text:span text:style-name="T9"/></text:p>
        </draw:line>
        <draw:line draw:style-name="gr6" draw:text-style-name="P26" draw:layer="layout" svg:x1="70.104cm" svg:y1="73.459cm" svg:x2="70.206cm" svg:y2="73.459cm">
          <text:p text:style-name="P5"><text:span text:style-name="T20"/></text:p>
          <text:p text:style-name="P5"><text:span text:style-name="T20">4</text:span></text:p>
        </draw:line>
        <draw:custom-shape draw:style-name="gr80" draw:text-style-name="P34" draw:layer="layout" svg:width="8.277cm" svg:height="4.863cm" svg:x="85.302cm" svg:y="2.963cm">
          <text:p text:style-name="P32"><text:span text:style-name="T30">Design notes:</text:span></text:p>
          <text:p text:style-name="P32"><text:span text:style-name="T30"/></text:p>
          <text:list text:style-name="L1">
            <text:list-item>
              <text:p text:style-name="P33"><text:span text:style-name="T30">Created with Libreoffice Draw</text:span></text:p>
            </text:list-item>
            <text:list-item>
              <text:p text:style-name="P33"><text:span text:style-name="T30">(x-axis) 0.01” = 1 year</text:span></text:p>
            </text:list-item>
            <text:list-item>
              <text:p text:style-name="P32"><text:span text:style-name="T30">(y-axis) not drawn to scale</text:span></text:p>
            </text:list-item>
            <text:list-item>
              <text:p text:style-name="P33"><text:span text:style-name="T31">Limited to </text:span><text:span text:style-name="T30">1/100</text:span><text:span text:style-name="T32">th</text:span><text:span text:style-name="T33"> of an inch</text:span></text:p>
              <text:list>
                <text:list-item>
                  <text:p text:style-name="P33"><text:span text:style-name="T33">eg. 0.03975” → 0.04”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1" draw:text-style-name="P19" draw:layer="layout" svg:x1="69.063cm" svg:y1="65.357cm" svg:x2="69.063cm" svg:y2="65.675cm">
          <text:p/>
        </draw:line>
        <draw:line draw:style-name="gr54" draw:text-style-name="P1" draw:layer="layout" svg:x1="59.919cm" svg:y1="73.459cm" svg:x2="59.919cm" svg:y2="75.249cm">
          <text:p text:style-name="P5"/>
          <text:p text:style-name="P5"/>
        </draw:line>
        <draw:line draw:style-name="gr57" draw:text-style-name="P1" draw:layer="layout" svg:x1="59.919cm" svg:y1="72.849cm" svg:x2="59.919cm" svg:y2="73.459cm">
          <text:p text:style-name="P5">71</text:p>
          <text:p text:style-name="P5"/>
        </draw:line>
        <draw:line draw:style-name="gr6" draw:text-style-name="P1" draw:layer="layout" svg:x1="55.194cm" svg:y1="53.416cm" svg:x2="56.083cm" svg:y2="53.416cm">
          <text:p text:style-name="P5"/>
          <text:p text:style-name="P5">35</text:p>
        </draw:line>
        <draw:line draw:style-name="gr6" draw:text-style-name="P1" draw:layer="layout" svg:x1="54.178cm" svg:y1="50.259cm" svg:x2="56.083cm" svg:y2="50.259cm">
          <text:p text:style-name="P5">75</text:p>
          <text:p text:style-name="P5"/>
        </draw:line>
        <draw:line draw:style-name="gr82" draw:text-style-name="P1" draw:layer="layout" svg:x1="51.994cm" svg:y1="48.154cm" svg:x2="56.083cm" svg:y2="48.154cm">
          <text:p text:style-name="P5"><text:s text:c="29"/>161</text:p>
          <text:p text:style-name="P5"/>
        </draw:line>
        <draw:line draw:style-name="gr6" draw:text-style-name="P1" draw:layer="layout" svg:x1="53.171cm" svg:y1="45.559cm" svg:x2="56.083cm" svg:y2="45.559cm">
          <text:p text:style-name="P5"/>
          <text:p text:style-name="P5">115</text:p>
        </draw:line>
        <draw:line draw:style-name="gr6" draw:text-style-name="P1" draw:layer="layout" svg:x1="52.731cm" svg:y1="43.209cm" svg:x2="56.083cm" svg:y2="43.209cm">
          <text:p text:style-name="P5">132</text:p>
          <text:p text:style-name="P5"/>
        </draw:line>
        <draw:line draw:style-name="gr82" draw:text-style-name="P1" draw:layer="layout" svg:x1="51.969cm" svg:y1="41.691cm" svg:x2="56.083cm" svg:y2="41.691cm">
          <text:p text:style-name="P5"><text:s text:c="29"/>162</text:p>
          <text:p text:style-name="P5"/>
        </draw:line>
        <draw:line draw:style-name="gr83" draw:text-style-name="P1" draw:layer="layout" svg:x1="56.82cm" svg:y1="40.862cm" svg:x2="56.82cm" svg:y2="63.488cm">
          <text:p/>
        </draw:line>
        <draw:line draw:style-name="gr84" draw:text-style-name="P1" draw:layer="layout" svg:x1="56.083cm" svg:y1="48.154cm" svg:x2="56.82cm" svg:y2="48.154cm">
          <text:p text:style-name="P5">29</text:p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  <svg:font-face-uri xlink:href="Fonts/Font_Ubuntu_2.ttf" xlink:type="simple" loext:font-style="normal" loext:font-weight="bold">
          <svg:font-face-format svg:string="truetype"/>
        </svg:font-face-uri>
        <svg:font-face-uri xlink:href="Fonts/Font_Ubuntu_3.ttf" xlink:type="simple" loext:font-style="italic" loext:font-weight="normal">
          <svg:font-face-format svg:string="truetype"/>
        </svg:font-face-uri>
        <svg:font-face-uri xlink:href="Fonts/Font_Ubuntu_4.ttf" xlink:type="simple" loext:font-style="italic" loext:font-weight="bold">
          <svg:font-face-format svg:string="truetype"/>
        </svg:font-face-uri>
      </svg:font-face-src>
    </style:font-face>
    <style:font-face style:name="Ubuntu1" svg:font-family="Ubuntu" style:font-adornments="Regular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  <svg:font-face-uri xlink:href="Fonts/Font_Ubuntu_2.ttf" xlink:type="simple" loext:font-style="normal" loext:font-weight="bold">
          <svg:font-face-format svg:string="truetype"/>
        </svg:font-face-uri>
        <svg:font-face-uri xlink:href="Fonts/Font_Ubuntu_3.ttf" xlink:type="simple" loext:font-style="italic" loext:font-weight="normal">
          <svg:font-face-format svg:string="truetype"/>
        </svg:font-face-uri>
        <svg:font-face-uri xlink:href="Fonts/Font_Ubuntu_4.ttf" xlink:type="simple" loext:font-style="italic" loext:font-weight="bold">
          <svg:font-face-format svg:string="truetype"/>
        </svg:font-face-uri>
      </svg:font-face-src>
    </style:font-face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13" svg:d="M0 13l10-13 10 13z"/>
    <draw:marker draw:name="Arrowheads_20_7" draw:display-name="Arrowheads 7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marker draw:name="Arrowheads_20_9" draw:display-name="Arrowheads 9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96.52cm" fo:page-height="85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3T10:38:15.574521000</meta:creation-date>
    <dc:date>2026-04-03T18:20:18.577504300</dc:date>
    <meta:editing-duration>PT17H59M3S</meta:editing-duration>
    <meta:editing-cycles>389</meta:editing-cycles>
    <meta:generator>LibreOffice/26.2.2.2$Windows_X86_64 LibreOffice_project/1f77d10d6938fd34972958f64b2bcfa54f8b1ba5</meta:generator>
    <dc:title>Calculations from Bible data</dc:title>
    <meta:document-statistic meta:object-count="242"/>
  </office:meta>
</office:document-meta>
</file>