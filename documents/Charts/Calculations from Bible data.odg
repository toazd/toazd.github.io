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adornments="Regular" style:font-family-generic="swiss" style:font-pitch="variable"/>
    <style:font-face style:name="Ubuntu1" svg:font-family="Ubuntu" style:font-family-generic="swiss" style:font-pitch="variable"/>
  </office:font-face-decls>
  <office:automatic-styles>
    <style:style style:name="dp1" style:family="drawing-page"/>
    <style:style style:name="gr1" style:family="graphic" style:parent-style-name="objectwithoutfill">
      <style:graphic-properties draw:stroke="dash" draw:stroke-dash="Long_20_Dot" svg:stroke-width="0cm" svg:stroke-color="#ff0000" svg:stroke-linecap="butt" draw:fill="none" draw:textarea-vertical-align="middle" loext:decorative="false"/>
    </style:style>
    <style:style style:name="gr2" style:family="graphic" style:parent-style-name="standard">
      <style:graphic-properties draw:fill="solid" draw:fill-color="#fff5ce" draw:textarea-horizontal-align="justify" draw:textarea-vertical-align="middle" draw:auto-grow-height="false" fo:min-height="3.185cm" fo:min-width="7.475cm" fo:wrap-option="wrap" style:writing-mode="lr-tb" loext:decorative="false"/>
      <style:paragraph-properties style:writing-mode="lr-tb"/>
    </style:style>
    <style:style style:name="gr3" style:family="graphic" style:parent-style-name="objectwithoutfill">
      <style:graphic-properties svg:stroke-color="#ff0000" draw:fill="none" draw:textarea-vertical-align="middle" loext:decorative="false"/>
    </style:style>
    <style:style style:name="gr4" style:family="graphic" style:parent-style-name="objectwithoutfill">
      <style:graphic-properties draw:marker-start="Arrowheads_20_8" draw:fill="none" draw:textarea-vertical-align="middle" loext:decorative="false"/>
    </style:style>
    <style:style style:name="gr5" style:family="graphic" style:parent-style-name="objectwithoutfill">
      <style:graphic-properties draw:fill="none" draw:textarea-vertical-align="middle" loext:decorative="false"/>
    </style:style>
    <style:style style:name="gr6" style:family="graphic" style:parent-style-name="objectwithoutfill">
      <style:graphic-properties draw:fill="none" draw:textarea-vertical-align="middle" loext:decorative="false"/>
      <style:paragraph-properties style:writing-mode="lr-tb"/>
    </style:style>
    <style:style style:name="gr7" style:family="graphic" style:parent-style-name="standard">
      <style:graphic-properties draw:textarea-horizontal-align="justify" draw:textarea-vertical-align="middle" draw:auto-grow-height="false" fo:min-height="1.338cm" fo:min-width="3.48cm" style:writing-mode="lr-tb" loext:decorative="false"/>
      <style:paragraph-properties style:writing-mode="lr-tb"/>
    </style:style>
    <style:style style:name="gr8" style:family="graphic" style:parent-style-name="objectwithoutfill">
      <style:graphic-properties svg:stroke-color="#ff8000" draw:fill="none" draw:textarea-vertical-align="middle" loext:decorative="false"/>
      <style:paragraph-properties style:writing-mode="lr-tb"/>
    </style:style>
    <style:style style:name="gr9" style:family="graphic" style:parent-style-name="standard" style:list-style-name="L1">
      <style:graphic-properties draw:stroke="solid" draw:stroke-dash="Dash_20_Dot_20_4"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 style:family="graphic" style:parent-style-name="objectwithoutfill">
      <style:graphic-properties draw:marker-start="" draw:marker-end="Arrowheads_20_7" draw:fill="none" draw:textarea-vertical-align="middle" loext:decorative="false"/>
      <style:paragraph-properties style:writing-mode="lr-tb"/>
    </style:style>
    <style:style style:name="gr11" style:family="graphic" style:parent-style-name="standard">
      <style:graphic-properties draw:textarea-horizontal-align="justify" draw:textarea-vertical-align="middle" draw:auto-grow-height="false" fo:min-height="1.338cm" fo:min-width="14.74cm" style:writing-mode="lr-tb" loext:decorative="false"/>
      <style:paragraph-properties style:writing-mode="lr-tb"/>
    </style:style>
    <style:style style:name="gr12" style:family="graphic" style:parent-style-name="objectwithoutfill">
      <style:graphic-properties draw:stroke="dash" draw:stroke-dash="Dot" svg:stroke-color="#ff0000" svg:stroke-linecap="butt" draw:fill="none" draw:textarea-horizontal-align="center" draw:textarea-vertical-align="middle" loext:decorative="false"/>
    </style:style>
    <style:style style:name="gr13" style:family="graphic" style:parent-style-name="objectwithoutfill">
      <style:graphic-properties draw:stroke="dash" draw:stroke-dash="Dash" svg:stroke-color="#ff8000" svg:stroke-linecap="butt" draw:fill="none" draw:textarea-vertical-align="middle" loext:decorative="false"/>
    </style:style>
    <style:style style:name="gr14" style:family="graphic" style:parent-style-name="standard" style:list-style-name="L1">
      <style:graphic-properties draw:stroke="solid" draw:stroke-dash="Dash_20_Dot_20_4" svg:stroke-width="0cm" svg:stroke-color="#ff0000" draw:marker-start="" draw:marker-start-width="0.2cm" draw:marker-start-center="false" draw:marker-end="" draw:marker-end-width="0.2cm" draw:marker-end-center="false" draw:fill="none" draw:fill-color="#729fcf" draw:textarea-horizontal-align="center" draw:textarea-vertical-align="bottom" fo:padding-top="0.125cm" fo:padding-bottom="0.125cm" fo:padding-left="0.25cm" fo:padding-right="0.25cm" fo:wrap-option="wrap" draw:shadow="hidden" draw:shadow-offset-x="0.2cm" draw:shadow-offset-y="0.2cm" draw:shadow-color="#808080" loext:decorative="false"/>
    </style:style>
    <style:style style:name="gr15" style:family="graphic" style:parent-style-name="standard">
      <style:graphic-properties draw:fill="solid" draw:fill-color="#ffd7d7" draw:textarea-horizontal-align="justify" draw:textarea-vertical-align="middle" draw:auto-grow-height="false" fo:min-height="1.338cm" fo:min-width="2.726cm" style:writing-mode="lr-tb" loext:decorative="false"/>
      <style:paragraph-properties style:writing-mode="lr-tb"/>
    </style:style>
    <style:style style:name="gr16" style:family="graphic" style:parent-style-name="standard" style:list-style-name="L1">
      <style:graphic-properties draw:stroke="solid" draw:stroke-dash="Dash_20_Dot_20_4" svg:stroke-width="0cm" svg:stroke-color="#55308d" draw:marker-start="Arrowheads_20_7" draw:marker-start-width="0.2cm" draw:marker-start-center="false" draw:marker-end="Arrowheads_20_7"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7" style:family="graphic" style:parent-style-name="standard">
      <style:graphic-properties draw:textarea-horizontal-align="justify" draw:textarea-vertical-align="middle" draw:auto-grow-height="false" fo:min-height="1.338cm" fo:min-width="24.113cm" style:writing-mode="lr-tb" loext:decorative="false"/>
      <style:paragraph-properties style:writing-mode="lr-tb"/>
    </style:style>
    <style:style style:name="gr18" style:family="graphic" style:parent-style-name="objectwithoutfill">
      <style:graphic-properties draw:marker-start="Arrowheads_20_5" draw:fill="none" draw:textarea-vertical-align="middle" loext:decorative="false"/>
      <style:paragraph-properties style:writing-mode="lr-tb"/>
    </style:style>
    <style:style style:name="gr19" style:family="graphic" style:parent-style-name="standard">
      <style:graphic-properties draw:textarea-horizontal-align="justify" draw:textarea-vertical-align="middle" draw:auto-grow-height="false" fo:min-height="1.338cm" fo:min-width="19.236cm" style:writing-mode="lr-tb" loext:decorative="false"/>
      <style:paragraph-properties style:writing-mode="lr-tb"/>
    </style:style>
    <style:style style:name="gr20" style:family="graphic" style:parent-style-name="standard">
      <style:graphic-properties draw:textarea-horizontal-align="center" draw:textarea-vertical-align="middle" draw:auto-grow-height="false" fo:min-height="1.338cm" fo:min-width="23.63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1.338cm" fo:min-width="8.771cm" style:writing-mode="lr-tb" loext:decorative="false"/>
      <style:paragraph-properties style:writing-mode="lr-tb"/>
    </style:style>
    <style:style style:name="gr22" style:family="graphic" style:parent-style-name="standard">
      <style:graphic-properties draw:textarea-horizontal-align="justify" draw:textarea-vertical-align="middle" draw:auto-grow-height="false" fo:min-height="1.338cm" fo:min-width="23.935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1.338cm" fo:min-width="22.233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338cm" fo:min-width="22.614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1.338cm" fo:min-width="22.487cm" style:writing-mode="lr-tb" loext:decorative="false"/>
      <style:paragraph-properties style:writing-mode="lr-tb"/>
    </style:style>
    <style:style style:name="gr26" style:family="graphic" style:parent-style-name="standard">
      <style:graphic-properties draw:textarea-horizontal-align="justify" draw:textarea-vertical-align="middle" draw:auto-grow-height="false" fo:min-height="1.338cm" fo:min-width="22.665cm" style:writing-mode="lr-tb" loext:decorative="false"/>
      <style:paragraph-properties style:writing-mode="lr-tb"/>
    </style:style>
    <style:style style:name="gr27" style:family="graphic" style:parent-style-name="standard">
      <style:graphic-properties draw:textarea-horizontal-align="justify" draw:textarea-vertical-align="middle" draw:auto-grow-height="false" fo:min-height="1.338cm" fo:min-width="23.122cm" style:writing-mode="lr-tb" loext:decorative="false"/>
      <style:paragraph-properties style:writing-mode="lr-tb"/>
    </style:style>
    <style:style style:name="gr28" style:family="graphic" style:parent-style-name="objectwithoutfill">
      <style:graphic-properties draw:stroke="dash" draw:stroke-dash="Dot" svg:stroke-color="#ff0000" svg:stroke-linecap="butt" draw:fill="none" draw:textarea-vertical-align="middle" loext:decorative="false"/>
      <style:paragraph-properties style:writing-mode="lr-tb"/>
    </style:style>
    <style:style style:name="gr29" style:family="graphic" style:parent-style-name="objectwithoutfill">
      <style:graphic-properties draw:stroke="dash" draw:stroke-dash="Dot" svg:stroke-color="#ff0000" svg:stroke-linecap="butt" draw:fill="none" draw:textarea-vertical-align="middle" loext:decorative="false"/>
    </style:style>
    <style:style style:name="gr30" style:family="graphic" style:parent-style-name="standard">
      <style:graphic-properties draw:marker-start="Arrowheads_20_4" draw:marker-start-width="0.3cm" draw:textarea-vertical-align="middle" loext:decorative="false"/>
      <style:paragraph-properties style:writing-mode="lr-tb"/>
    </style:style>
    <style:style style:name="gr31" style:family="graphic" style:parent-style-name="objectwithoutfill">
      <style:graphic-properties draw:marker-start="" draw:marker-end="Arrowheads_20_5" draw:fill="none" draw:textarea-vertical-align="middle" loext:decorative="false"/>
      <style:paragraph-properties style:writing-mode="lr-tb"/>
    </style:style>
    <style:style style:name="gr32" style:family="graphic" style:parent-style-name="objectwithoutfill">
      <style:graphic-properties draw:marker-start="Arrowheads_20_5" draw:marker-end="" draw:fill="none" draw:textarea-horizontal-align="center" draw:textarea-vertical-align="middle" loext:decorative="false"/>
      <style:paragraph-properties style:writing-mode="lr-tb"/>
    </style:style>
    <style:style style:name="gr33" style:family="graphic" style:parent-style-name="standard" style:list-style-name="L1">
      <style:graphic-properties draw:stroke="solid" draw:stroke-dash="Dash_20_Dot_20_4" svg:stroke-width="0cm" svg:stroke-color="#3465a4" draw:marker-start="Arrowheads_20_5"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 style:family="graphic" style:parent-style-name="standard">
      <style:graphic-properties draw:marker-start="Arrowheads_20_7" draw:marker-start-width="0.3cm" draw:textarea-vertical-align="middle" loext:decorative="false"/>
      <style:paragraph-properties style:writing-mode="lr-tb"/>
    </style:style>
    <style:style style:name="gr35" style:family="graphic" style:parent-style-name="objectwithoutfill">
      <style:graphic-properties draw:marker-end="Arrowheads_20_7" draw:marker-end-width="0.3cm" draw:fill="none" draw:textarea-vertical-align="middle" loext:decorative="false"/>
      <style:paragraph-properties style:writing-mode="lr-tb"/>
    </style:style>
    <style:style style:name="gr36" style:family="graphic" style:parent-style-name="standard">
      <style:graphic-properties draw:textarea-horizontal-align="justify" draw:textarea-vertical-align="middle" draw:auto-grow-height="false" fo:min-height="1.338cm" fo:min-width="10.625cm" style:writing-mode="lr-tb" loext:decorative="false"/>
      <style:paragraph-properties style:writing-mode="lr-tb"/>
    </style:style>
    <style:style style:name="gr37" style:family="graphic" style:parent-style-name="objectwithoutfill">
      <style:graphic-properties draw:marker-start="Arrowheads_20_5" draw:fill="none" draw:textarea-horizontal-align="center" draw:textarea-vertical-align="middle" loext:decorative="false"/>
      <style:paragraph-properties style:writing-mode="lr-tb"/>
    </style:style>
    <style:style style:name="gr38" style:family="graphic" style:parent-style-name="standard">
      <style:graphic-properties draw:textarea-horizontal-align="justify" draw:textarea-vertical-align="middle" draw:auto-grow-height="false" fo:min-height="1.338cm" fo:min-width="11.286cm" style:writing-mode="lr-tb" loext:decorative="false"/>
      <style:paragraph-properties style:writing-mode="lr-tb"/>
    </style:style>
    <style:style style:name="gr39" style:family="graphic" style:parent-style-name="standard">
      <style:graphic-properties draw:textarea-horizontal-align="justify" draw:textarea-vertical-align="middle" draw:auto-grow-height="false" fo:min-height="1.338cm" fo:min-width="5.571cm" style:writing-mode="lr-tb" loext:decorative="false"/>
      <style:paragraph-properties style:writing-mode="lr-tb"/>
    </style:style>
    <style:style style:name="gr40" style:family="graphic" style:parent-style-name="standard">
      <style:graphic-properties draw:textarea-horizontal-align="justify" draw:textarea-vertical-align="middle" draw:auto-grow-height="false" fo:min-height="1.338cm" fo:min-width="5.342cm" style:writing-mode="lr-tb" loext:decorative="false"/>
      <style:paragraph-properties style:writing-mode="lr-tb"/>
    </style:style>
    <style:style style:name="gr41" style:family="graphic" style:parent-style-name="standard">
      <style:graphic-properties draw:textarea-horizontal-align="justify" draw:textarea-vertical-align="middle" draw:auto-grow-height="false" fo:min-height="1.338cm" fo:min-width="3.259cm" style:writing-mode="lr-tb" loext:decorative="false"/>
      <style:paragraph-properties style:writing-mode="lr-tb"/>
    </style:style>
    <style:style style:name="gr42" style:family="graphic" style:parent-style-name="standard">
      <style:graphic-properties draw:textarea-horizontal-align="justify" draw:textarea-vertical-align="middle" draw:auto-grow-height="false" fo:min-height="1.338cm" fo:min-width="4.707cm" style:writing-mode="lr-tb" loext:decorative="false"/>
      <style:paragraph-properties style:writing-mode="lr-tb"/>
    </style:style>
    <style:style style:name="gr43" style:family="graphic" style:parent-style-name="standard">
      <style:graphic-properties draw:textarea-horizontal-align="justify" draw:textarea-vertical-align="middle" draw:auto-grow-height="false" fo:min-height="1.338cm" fo:min-width="3.945cm" style:writing-mode="lr-tb" loext:decorative="false"/>
      <style:paragraph-properties style:writing-mode="lr-tb"/>
    </style:style>
    <style:style style:name="gr44" style:family="graphic" style:parent-style-name="standard" style:list-style-name="L1">
      <style:graphic-properties draw:stroke="solid" draw:stroke-dash="Dash_20_Dot_20_4" svg:stroke-width="0cm" svg:stroke-color="#3465a4" draw:marker-start="Arrowheads_20_5"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5" style:family="graphic" style:parent-style-name="standard" style:list-style-name="L1">
      <style:graphic-properties draw:stroke="solid" draw:stroke-dash="Dash_20_Dot_20_4" svg:stroke-width="0cm" svg:stroke-color="#3465a4" draw:marker-start="" draw:marker-start-width="0.2cm" draw:marker-start-center="false" draw:marker-end="Arrowheads_20_7"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6" style:family="graphic" style:parent-style-name="standard" style:list-style-name="L1">
      <style:graphic-properties draw:stroke="solid" draw:stroke-dash="Dash_20_Dot_20_4" svg:stroke-width="0cm" svg:stroke-color="#3465a4" draw:marker-start="" draw:marker-start-width="0.2cm" draw:marker-start-center="false" draw:marker-end="Arrowheads_20_7"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 style:family="graphic" style:parent-style-name="standard" style:list-style-name="L1">
      <style:graphic-properties draw:stroke="solid" draw:stroke-dash="Dash_20_Dot_20_4"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8" style:family="graphic" style:parent-style-name="standard">
      <style:graphic-properties draw:textarea-horizontal-align="justify" draw:textarea-vertical-align="middle" draw:auto-grow-height="false" fo:min-height="1.338cm" fo:min-width="2.98cm" style:writing-mode="lr-tb" loext:decorative="false"/>
      <style:paragraph-properties style:writing-mode="lr-tb"/>
    </style:style>
    <style:style style:name="gr49" style:family="graphic" style:parent-style-name="standard">
      <style:graphic-properties draw:textarea-horizontal-align="justify" draw:textarea-vertical-align="middle" draw:auto-grow-height="false" fo:min-height="1.338cm" fo:min-width="4.072cm" style:writing-mode="lr-tb" loext:decorative="false"/>
      <style:paragraph-properties style:writing-mode="lr-tb"/>
    </style:style>
    <style:style style:name="gr50" style:family="graphic" style:parent-style-name="objectwithoutfill">
      <style:graphic-properties draw:marker-start="Arrowheads_20_7" draw:fill="none" draw:textarea-vertical-align="middle" loext:decorative="false"/>
      <style:paragraph-properties style:writing-mode="lr-tb"/>
    </style:style>
    <style:style style:name="gr51" style:family="graphic" style:parent-style-name="standard">
      <style:graphic-properties draw:fill="solid" draw:fill-color="#fff5ce" draw:textarea-horizontal-align="justify" draw:textarea-vertical-align="middle" draw:auto-grow-height="false" fo:min-height="4.308cm" fo:min-width="6.556cm" fo:wrap-option="wrap" style:writing-mode="lr-tb" loext:decorative="false"/>
      <style:paragraph-properties style:writing-mode="lr-tb"/>
    </style:style>
    <style:style style:name="gr52" style:family="graphic" style:parent-style-name="standard">
      <style:graphic-properties draw:fill="solid" draw:fill-color="#fff5ce" draw:textarea-horizontal-align="justify" draw:textarea-vertical-align="middle" draw:auto-grow-height="false" fo:min-height="1.349cm" fo:min-width="2.226cm" fo:wrap-option="wrap" style:writing-mode="lr-tb" loext:decorative="false"/>
      <style:paragraph-properties style:writing-mode="lr-tb"/>
    </style:style>
    <style:style style:name="gr53" style:family="graphic" style:parent-style-name="objectwithoutfill">
      <style:graphic-properties svg:stroke-color="#ff8000" draw:marker-start="" draw:marker-end="Arrowheads_20_7" draw:fill="none" draw:textarea-vertical-align="middle" loext:decorative="false"/>
      <style:paragraph-properties style:writing-mode="lr-tb"/>
    </style:style>
    <style:style style:name="gr54" style:family="graphic" style:parent-style-name="objectwithoutfill">
      <style:graphic-properties draw:marker-start="" draw:marker-end="" draw:fill="none" draw:textarea-vertical-align="middle" loext:decorative="false"/>
      <style:paragraph-properties style:writing-mode="lr-tb"/>
    </style:style>
    <style:style style:name="gr55" style:family="graphic" style:parent-style-name="objectwithoutfill">
      <style:graphic-properties svg:stroke-width="0.018cm" svg:stroke-color="#ff0000" draw:marker-start-width="0.227cm" draw:marker-end-width="0.227cm" draw:fill="none" draw:textarea-vertical-align="middle" fo:padding-top="0.134cm" fo:padding-bottom="0.134cm" fo:padding-left="0.136cm" fo:padding-right="0.136cm" loext:decorative="false"/>
      <style:paragraph-properties style:writing-mode="lr-tb"/>
    </style:style>
    <style:style style:name="gr56" style:family="graphic" style:parent-style-name="standard">
      <style:graphic-properties draw:fill="solid" draw:fill-color="#fff5ce" draw:textarea-horizontal-align="justify" draw:textarea-vertical-align="middle" draw:auto-grow-height="false" fo:min-height="2.247cm" fo:min-width="4.336cm" fo:wrap-option="wrap" style:writing-mode="lr-tb" loext:decorative="false"/>
      <style:paragraph-properties style:writing-mode="lr-tb"/>
    </style:style>
    <style:style style:name="gr57" style:family="graphic" style:parent-style-name="objectwithoutfill">
      <style:graphic-properties draw:marker-start="" draw:marker-end="Arrowheads_20_8" draw:fill="none" draw:textarea-vertical-align="middle" loext:decorative="false"/>
      <style:paragraph-properties style:writing-mode="lr-tb"/>
    </style:style>
    <style:style style:name="gr58" style:family="graphic" style:parent-style-name="standard">
      <style:graphic-properties draw:fill="solid" draw:fill-color="#fff5ce" draw:textarea-horizontal-align="justify" draw:textarea-vertical-align="middle" draw:auto-grow-height="false" fo:min-height="7.868cm" fo:min-width="11.817cm" fo:wrap-option="wrap" style:writing-mode="lr-tb" loext:decorative="false"/>
      <style:paragraph-properties style:writing-mode="lr-tb"/>
    </style:style>
    <style:style style:name="gr59" style:family="graphic" style:parent-style-name="standard">
      <style:graphic-properties draw:textarea-horizontal-align="justify" draw:textarea-vertical-align="middle" draw:auto-grow-height="false" fo:min-height="1.338cm" fo:min-width="2.54cm" style:writing-mode="lr-tb" loext:decorative="false"/>
      <style:paragraph-properties style:writing-mode="lr-tb"/>
    </style:style>
    <style:style style:name="gr60" style:family="graphic" style:parent-style-name="objectwithoutfill">
      <style:graphic-properties svg:stroke-color="#3465a4" draw:fill="none" draw:textarea-vertical-align="middle" loext:decorative="false"/>
      <style:paragraph-properties style:writing-mode="lr-tb"/>
    </style:style>
    <style:style style:name="gr61" style:family="graphic" style:parent-style-name="standard">
      <style:graphic-properties svg:stroke-color="#ff0000" draw:textarea-vertical-align="middle" loext:decorative="false"/>
      <style:paragraph-properties style:writing-mode="lr-tb"/>
    </style:style>
    <style:style style:name="gr62" style:family="graphic" style:parent-style-name="standard">
      <style:graphic-properties draw:fill="solid" draw:fill-color="#fff5ce" draw:textarea-horizontal-align="justify" draw:textarea-vertical-align="middle" draw:auto-grow-height="false" fo:min-height="2.049cm" fo:min-width="4.166cm" fo:wrap-option="wrap" style:writing-mode="lr-tb" loext:decorative="false"/>
      <style:paragraph-properties style:writing-mode="lr-tb"/>
    </style:style>
    <style:style style:name="gr63" style:family="graphic" style:parent-style-name="objectwithoutfill">
      <style:graphic-properties svg:stroke-color="#ffbf00" draw:fill="none" draw:textarea-vertical-align="middle" loext:decorative="false"/>
    </style:style>
    <style:style style:name="gr64" style:family="graphic" style:parent-style-name="standard">
      <style:graphic-properties draw:textarea-horizontal-align="justify" draw:textarea-vertical-align="middle" draw:auto-grow-height="false" fo:min-height="1.338cm" fo:min-width="2.548cm" style:writing-mode="lr-tb" loext:decorative="false"/>
      <style:paragraph-properties style:writing-mode="lr-tb"/>
    </style:style>
    <style:style style:name="gr65" style:family="graphic" style:parent-style-name="standard" style:list-style-name="L1">
      <style:graphic-properties draw:stroke="solid" draw:stroke-dash="Dash_20_Dot_20_4"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127cm" fo:padding-right="0.127cm" fo:wrap-option="wrap" draw:shadow="hidden" draw:shadow-offset-x="0.2cm" draw:shadow-offset-y="0.2cm" draw:shadow-color="#808080" loext:decorative="false"/>
      <style:paragraph-properties style:writing-mode="lr-tb"/>
    </style:style>
    <style:style style:name="gr66" style:family="graphic" style:parent-style-name="standard">
      <style:graphic-properties draw:fill="solid" draw:fill-color="#fff5ce" draw:textarea-horizontal-align="justify" draw:textarea-vertical-align="middle" draw:auto-grow-height="false" fo:min-height="0.219cm" fo:min-width="0.246cm" fo:wrap-option="wrap" style:writing-mode="lr-tb" loext:decorative="false"/>
      <style:paragraph-properties style:writing-mode="lr-tb"/>
    </style:style>
    <style:style style:name="gr67" style:family="graphic" style:parent-style-name="standard">
      <style:graphic-properties draw:textarea-vertical-align="middle" loext:decorative="false"/>
    </style:style>
    <style:style style:name="gr68" style:family="graphic" style:parent-style-name="standard">
      <style:graphic-properties draw:textarea-horizontal-align="justify" draw:textarea-vertical-align="middle" draw:auto-grow-height="false" fo:min-height="1.338cm" fo:min-width="2.794cm" style:writing-mode="lr-tb" loext:decorative="false"/>
      <style:paragraph-properties style:writing-mode="lr-tb"/>
    </style:style>
    <style:style style:name="gr69" style:family="graphic" style:parent-style-name="standard">
      <style:graphic-properties draw:fill="solid" draw:fill-color="#fff5ce" draw:textarea-horizontal-align="justify" draw:textarea-vertical-align="middle" draw:auto-grow-height="false" fo:min-height="0.72cm" fo:min-width="4.906cm" fo:wrap-option="wrap" style:writing-mode="lr-tb" loext:decorative="false"/>
      <style:paragraph-properties style:writing-mode="lr-tb"/>
    </style:style>
    <style:style style:name="gr70" style:family="graphic" style:parent-style-name="standard">
      <style:graphic-properties draw:fill="solid" draw:fill-color="#fff5ce" draw:textarea-horizontal-align="justify" draw:textarea-vertical-align="middle" draw:auto-grow-height="false" fo:min-height="1.973cm" fo:min-width="3.732cm" fo:wrap-option="wrap" style:writing-mode="lr-tb" loext:decorative="false"/>
      <style:paragraph-properties style:writing-mode="lr-tb"/>
    </style:style>
    <style:style style:name="gr71" style:family="graphic" style:parent-style-name="standard">
      <style:graphic-properties draw:fill="solid" draw:fill-color="#fff5ce" draw:textarea-horizontal-align="justify" draw:textarea-vertical-align="middle" draw:auto-grow-height="false" fo:min-height="0.572cm" fo:min-width="3.594cm" fo:wrap-option="wrap" style:writing-mode="lr-tb" loext:decorative="false"/>
      <style:paragraph-properties style:writing-mode="lr-tb"/>
    </style:style>
    <style:style style:name="gr72" style:family="graphic" style:parent-style-name="standard">
      <style:graphic-properties draw:fill="solid" draw:fill-color="#fff5ce" draw:textarea-horizontal-align="justify" draw:textarea-vertical-align="middle" draw:auto-grow-height="false" fo:min-height="1.54cm" fo:min-width="4.657cm" fo:wrap-option="wrap" style:writing-mode="lr-tb" loext:decorative="false"/>
      <style:paragraph-properties style:writing-mode="lr-tb"/>
    </style:style>
    <style:style style:name="gr73" style:family="graphic" style:parent-style-name="standard">
      <style:graphic-properties draw:fill="solid" draw:fill-color="#fff5ce" draw:textarea-horizontal-align="justify" draw:textarea-vertical-align="middle" draw:auto-grow-height="false" fo:min-height="4.454cm" fo:min-width="5.413cm" fo:wrap-option="wrap" style:writing-mode="lr-tb" loext:decorative="false"/>
      <style:paragraph-properties style:writing-mode="lr-tb"/>
    </style:style>
    <style:style style:name="gr74" style:family="graphic" style:parent-style-name="objectwithoutfill">
      <style:graphic-properties draw:stroke="dash" draw:stroke-dash="Dot" svg:stroke-color="#ffbf00" svg:stroke-linecap="butt" draw:fill="none" draw:textarea-vertical-align="middle" loext:decorative="false"/>
      <style:paragraph-properties style:writing-mode="lr-tb"/>
    </style:style>
    <style:style style:name="gr75" style:family="graphic" style:parent-style-name="standard">
      <style:graphic-properties draw:textarea-horizontal-align="justify" draw:textarea-vertical-align="middle" draw:auto-grow-height="false" fo:min-height="1.338cm" fo:min-width="2.87cm" style:writing-mode="lr-tb" loext:decorative="false"/>
      <style:paragraph-properties style:writing-mode="lr-tb"/>
    </style:style>
    <style:style style:name="gr76" style:family="graphic" style:parent-style-name="standard">
      <style:graphic-properties draw:fill="solid" draw:fill-color="#fff5ce" draw:textarea-horizontal-align="justify" draw:textarea-vertical-align="middle" draw:auto-grow-height="false" fo:min-height="1.304cm" fo:min-width="6.46cm" fo:wrap-option="wrap" style:writing-mode="lr-tb" loext:decorative="false"/>
      <style:paragraph-properties style:writing-mode="lr-tb"/>
    </style:style>
    <style:style style:name="gr77" style:family="graphic" style:parent-style-name="objectwithoutfill">
      <style:graphic-properties draw:marker-start="Arrowheads_20_9" draw:marker-end="" draw:fill="none" draw:textarea-vertical-align="middle" loext:decorative="false"/>
      <style:paragraph-properties style:writing-mode="lr-tb"/>
    </style:style>
    <style:style style:name="gr78" style:family="graphic" style:parent-style-name="standard">
      <style:graphic-properties draw:textarea-horizontal-align="justify" draw:textarea-vertical-align="middle" draw:auto-grow-height="false" fo:min-height="1.338cm" fo:min-width="1.905cm" style:writing-mode="lr-tb" loext:decorative="false"/>
      <style:paragraph-properties style:writing-mode="lr-tb"/>
    </style:style>
    <style:style style:name="gr79" style:family="graphic" style:parent-style-name="objectwithoutfill">
      <style:graphic-properties svg:stroke-color="#55308d" draw:fill="none" draw:textarea-vertical-align="middle" loext:decorative="false"/>
    </style:style>
    <style:style style:name="gr80" style:family="graphic" style:parent-style-name="standard">
      <style:graphic-properties draw:fill="solid" draw:fill-color="#fff5ce" draw:textarea-horizontal-align="justify" draw:textarea-vertical-align="middle" draw:auto-grow-height="false" fo:min-height="4.139cm" fo:min-width="7.549cm" style:writing-mode="lr-tb" loext:decorative="false"/>
      <style:paragraph-properties style:writing-mode="lr-tb"/>
    </style:style>
    <style:style style:name="gr81" style:family="graphic" style:parent-style-name="standard" style:list-style-name="L1">
      <style:graphic-properties draw:stroke="solid" draw:stroke-dash="Dash_20_Dot_20_4"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127cm" fo:padding-right="0.127cm" fo:wrap-option="wrap" draw:shadow="hidden" draw:shadow-offset-x="0.2cm" draw:shadow-offset-y="0.2cm" draw:shadow-color="#808080" loext:decorative="false"/>
    </style:style>
    <style:style style:name="gr82" style:family="graphic" style:parent-style-name="objectwithoutfill">
      <style:graphic-properties draw:marker-start="" draw:marker-end="" draw:fill="none" draw:textarea-vertical-align="middle" loext:decorative="false"/>
    </style:style>
    <style:style style:name="gr83" style:family="graphic" style:parent-style-name="objectwithoutfill">
      <style:graphic-properties draw:stroke="dash" draw:stroke-dash="Dash" svg:stroke-color="#ff8000" svg:stroke-linecap="butt" draw:fill="none" draw:textarea-vertical-align="middle" loext:decorative="false"/>
      <style:paragraph-properties style:writing-mode="lr-tb"/>
    </style:style>
    <style:style style:name="gr84" style:family="graphic" style:parent-style-name="objectwithoutfill">
      <style:graphic-properties draw:stroke="dash" draw:stroke-dash="Long_20_Dot" svg:stroke-color="#55308d" svg:stroke-linecap="butt" draw:fill="none" draw:textarea-vertical-align="middle" loext:decorative="false"/>
    </style:style>
    <style:style style:name="gr85" style:family="graphic" style:parent-style-name="objectwithoutfill">
      <style:graphic-properties draw:stroke="dash" draw:stroke-dash="Dot" svg:stroke-linecap="butt" draw:fill="none" draw:textarea-vertical-align="middle"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text-properties fo:font-size="8pt" style:font-size-asian="8pt" style:font-size-complex="8pt"/>
    </style:style>
    <style:style style:name="P3" style:family="paragraph">
      <loext:graphic-properties draw:fill="solid" draw:fill-color="#fff5ce"/>
      <style:paragraph-properties fo:text-align="center" style:writing-mode="lr-tb"/>
      <style:text-properties fo:font-size="8pt" style:font-size-asian="8pt" style:font-size-complex="8pt"/>
    </style:style>
    <style:style style:name="P4" style:family="paragraph">
      <loext:graphic-properties draw:fill="none"/>
      <style:paragraph-properties fo:text-align="center"/>
      <style:text-properties fo:font-size="10pt" style:font-size-asian="10pt" style:font-size-complex="10pt"/>
    </style:style>
    <style:style style:name="P5" style:family="paragraph">
      <style:paragraph-properties fo:text-align="center"/>
    </style:style>
    <style:style style:name="P6" style:family="paragraph">
      <style:paragraph-properties fo:text-align="center"/>
      <style:text-properties style:font-name="Ubuntu1" fo:font-size="12pt"/>
    </style:style>
    <style:style style:name="P7" style:family="paragraph">
      <style:paragraph-properties fo:text-align="center" style:writing-mode="lr-tb"/>
      <style:text-properties style:font-name="Ubuntu1" fo:font-size="12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 style:family="paragraph">
      <loext:graphic-properties draw:fill="none"/>
      <style:paragraph-properties fo:text-align="center"/>
      <style:text-properties fo:font-size="8pt" style:font-size-asian="8pt" style:font-size-complex="8pt"/>
    </style:style>
    <style:style style:name="P11" style:family="paragraph">
      <loext:graphic-properties draw:fill="none"/>
      <style:paragraph-properties fo:text-align="right"/>
      <style:text-properties style:use-window-font-color="true" loext:opacity="0%"/>
    </style:style>
    <style:style style:name="P12" style:family="paragraph">
      <loext:graphic-properties draw:fill="none" draw:fill-color="#729fcf"/>
      <style:paragraph-properties fo:margin-left="0cm" fo:margin-right="0cm" fo:margin-top="0cm" fo:margin-bottom="0cm" fo:line-height="100%" fo:text-align="right" fo:text-indent="0cm"/>
      <style:text-properties fo:font-variant="normal" fo:text-transform="none" style:use-window-font-color="true" loext:opacity="0%" style:text-outline="false" style:text-line-through-style="none" style:text-line-through-type="none" style:font-name="Ubuntu"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 style:family="paragraph">
      <loext:graphic-properties draw:fill="solid" draw:fill-color="#ffd7d7"/>
      <style:paragraph-properties fo:text-align="center" style:writing-mode="lr-tb"/>
      <style:text-properties style:font-name="Ubuntu1" fo:font-size="12pt"/>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55308d" loext:opacity="10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text-properties fo:font-size="12pt"/>
    </style:style>
    <style:style style:name="P16" style:family="paragraph">
      <loext:graphic-properties draw:fill="none"/>
      <style:paragraph-properties fo:text-align="center"/>
      <style:text-properties fo:font-size="6pt" style:font-size-asian="6pt" style:font-size-complex="6pt"/>
    </style:style>
    <style:style style:name="P17" style:family="paragraph">
      <style:paragraph-properties fo:text-align="right"/>
    </style:style>
    <style:style style:name="P18" style:family="paragraph">
      <loext:graphic-properties draw:fill="none"/>
      <style:paragraph-properties fo:text-align="right"/>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22" style:family="paragraph">
      <loext:graphic-properties draw:fill="none"/>
      <style:paragraph-properties fo:text-align="center"/>
      <style:text-properties fo:font-size="9pt" style:font-size-asian="9pt" style:font-size-complex="9pt"/>
    </style:style>
    <style:style style:name="P23" style:family="paragraph">
      <loext:graphic-properties draw:fill="none"/>
      <style:paragraph-properties fo:margin-left="0cm" fo:margin-right="0cm" fo:margin-top="0cm" fo:margin-bottom="0cm" fo:line-height="100%" fo:text-align="center" fo:text-indent="0cm"/>
    </style:style>
    <style:style style:name="P24" style:family="paragraph">
      <style:paragraph-properties fo:text-align="center"/>
      <style:text-properties fo:font-size="8pt"/>
    </style:style>
    <style:style style:name="P25" style:family="paragraph">
      <loext:graphic-properties draw:fill="solid" draw:fill-color="#fff5ce"/>
      <style:paragraph-properties fo:text-align="center" style:writing-mode="lr-tb"/>
      <style:text-properties fo:font-size="8pt"/>
    </style:style>
    <style:style style:name="P26" style:family="paragraph">
      <loext:graphic-properties draw:fill="none"/>
      <style:paragraph-properties fo:text-align="center"/>
      <style:text-properties fo:font-size="2pt" style:font-size-asian="2pt" style:font-size-complex="2pt"/>
    </style:style>
    <style:style style:name="P27" style:family="paragraph">
      <style:paragraph-properties fo:text-align="center"/>
      <style:text-properties fo:font-size="2pt" style:font-size-asian="2pt" style:font-size-complex="2pt"/>
    </style:style>
    <style:style style:name="P28" style:family="paragraph">
      <loext:graphic-properties draw:fill="none"/>
      <style:paragraph-properties fo:text-align="center"/>
      <style:text-properties fo:font-size="4pt" style:font-size-asian="4pt" style:font-size-complex="4pt"/>
    </style:style>
    <style:style style:name="P29" style:family="paragraph">
      <loext:graphic-properties draw:fill="solid" draw:fill-color="#fff5ce"/>
      <style:paragraph-properties fo:text-align="center" style:writing-mode="lr-tb"/>
    </style:style>
    <style:style style:name="P30" style:family="paragraph">
      <style:paragraph-properties fo:text-align="center"/>
      <style:text-properties style:font-name="Ubuntu1" fo:font-size="10pt" style:font-size-asian="10pt" style:font-size-complex="10pt"/>
    </style:style>
    <style:style style:name="P31" style:family="paragraph">
      <style:paragraph-properties fo:text-align="center" style:writing-mode="lr-tb"/>
      <style:text-properties style:font-name="Ubuntu1" fo:font-size="10pt" style:font-size-asian="10pt" style:font-size-complex="10pt"/>
    </style:style>
    <style:style style:name="P32" style:family="paragraph">
      <style:paragraph-properties fo:text-align="left"/>
      <style:text-properties fo:font-size="14pt" style:font-size-asian="14pt" style:font-size-complex="14pt"/>
    </style:style>
    <style:style style:name="P33" style:family="paragraph">
      <style:paragraph-properties fo:margin-left="0cm" fo:margin-right="0cm" fo:margin-top="0cm" fo:margin-bottom="0cm" fo:line-height="100%" fo:text-align="left" fo:text-indent="0cm"/>
      <style:text-properties fo:font-size="14pt" style:font-size-asian="14pt" style:font-size-complex="14pt"/>
    </style:style>
    <style:style style:name="P34" style:family="paragraph">
      <loext:graphic-properties draw:fill="solid" draw:fill-color="#fff5ce"/>
      <style:paragraph-properties fo:text-align="left" style:writing-mode="lr-tb"/>
      <style:text-properties fo:font-size="14pt" style:font-size-asian="14pt" style:font-size-complex="14pt"/>
    </style:style>
    <style:style style:name="T1" style:family="text">
      <style:text-properties fo:font-size="8pt" style:text-underline-style="none" style:font-size-asian="8pt" style:font-size-complex="8pt"/>
    </style:style>
    <style:style style:name="T2" style:family="text">
      <style:text-properties fo:font-size="8pt" style:font-size-asian="8pt" style:font-size-complex="8pt"/>
    </style:style>
    <style:style style:name="T3" style:family="text">
      <style:text-properties style:text-position="super 58%" fo:font-size="8pt"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style:font-name="Ubuntu1" fo:font-size="12pt"/>
    </style:style>
    <style:style style:name="T6" style:family="text">
      <style:text-properties fo:font-size="10pt" style:font-size-asian="10pt" style:font-size-complex="10pt"/>
    </style:style>
    <style:style style:name="T7" style:family="text">
      <style:text-properties fo:font-variant="normal" fo:text-transform="none" style:use-window-font-color="true" loext:opacity="0%" style:text-outline="false" style:text-line-through-style="none" style:text-line-through-type="none" style:font-name="Ubuntu"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55308d" loext:opacity="10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9" style:family="text">
      <style:text-properties fo:font-size="12pt"/>
    </style:style>
    <style:style style:name="T10" style:family="text">
      <style:text-properties fo:font-size="6pt" style:font-size-asian="6pt" style:font-size-complex="6pt"/>
    </style:style>
    <style:style style:name="T11" style:family="text">
      <style:text-properties fo:font-variant="normal" fo:text-transform="none" style:use-window-font-color="true" loext:opacity="0%" style:text-outline="false" style:text-line-through-style="none" style:text-line-through-type="none" style:font-name="Ubuntu"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0000" loext:opacity="100%" style:text-outline="false" style:text-line-through-style="none" style:text-line-through-type="none" style:font-name="Ubuntu"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Ubuntu"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Ubuntu"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15" style:family="text">
      <style:text-properties fo:font-size="9pt" style:font-size-asian="9pt" style:font-size-complex="9pt"/>
    </style:style>
    <style:style style:name="T16" style:family="text">
      <style:text-properties fo:font-variant="normal" fo:text-transform="none" style:use-window-font-color="true" loext:opacity="0%" style:text-outline="false" style:text-line-through-style="none" style:text-line-through-type="none" style:text-position="super 58%" style:font-name="Ubuntu"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7" style:family="text">
      <style:text-properties fo:font-size="8pt"/>
    </style:style>
    <style:style style:name="T18" style:family="text">
      <style:text-properties fo:font-size="8pt" fo:font-weight="bold" style:font-weight-asian="bold" style:font-weight-complex="bold"/>
    </style:style>
    <style:style style:name="T19" style:family="text">
      <style:text-properties fo:font-size="8pt" fo:font-style="italic" style:font-style-asian="italic" style:font-style-complex="italic"/>
    </style:style>
    <style:style style:name="T20" style:family="text">
      <style:text-properties fo:font-size="2pt" style:font-size-asian="2pt" style:font-size-complex="2pt"/>
    </style:style>
    <style:style style:name="T21" style:family="text">
      <style:text-properties fo:font-size="4pt" style:font-size-asian="4pt" style:font-size-complex="4pt"/>
    </style:style>
    <style:style style:name="T22" style:family="text">
      <style:text-properties style:font-name="Ubuntu1" fo:font-size="10pt" style:font-size-asian="10pt" style:font-size-complex="10pt"/>
    </style:style>
    <style:style style:name="T23" style:family="text">
      <style:text-properties fo:font-size="8pt" fo:font-weight="normal" style:font-size-asian="8pt" style:font-weight-asian="normal" style:font-size-complex="8pt" style:font-weight-complex="normal"/>
    </style:style>
    <style:style style:name="T24" style:family="text">
      <style:text-properties style:text-position="super 58%" fo:font-size="8pt" fo:font-weight="normal" style:font-size-asian="8pt" style:font-weight-asian="normal" style:font-size-complex="8pt" style:font-weight-complex="normal"/>
    </style:style>
    <style:style style:name="T25" style:family="text">
      <style:text-properties fo:font-variant="normal" fo:text-transform="none" style:use-window-font-color="true" loext:opacity="0%" style:text-outline="false" style:text-line-through-style="none" style:text-line-through-type="none" style:font-name="Ubuntu"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26" style:family="text">
      <style:text-properties fo:color="#ff0000" loext:opacity="100%" fo:font-size="12pt"/>
    </style:style>
    <style:style style:name="T27" style:family="text">
      <style:text-properties style:text-position="super 58%" fo:font-size="8pt"/>
    </style:style>
    <style:style style:name="T28" style:family="text">
      <style:text-properties fo:color="#ff0000" loext:opacity="100%" fo:font-size="8pt"/>
    </style:style>
    <style:style style:name="T29" style:family="text">
      <style:text-properties fo:font-size="8pt" fo:font-weight="normal" style:font-weight-asian="normal" style:font-weight-complex="normal"/>
    </style:style>
    <style:style style:name="T30" style:family="text">
      <style:text-propertie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Ubuntu"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32" style:family="text">
      <style:text-properties style:text-position="super 58%" fo:font-size="14pt" style:font-size-asian="14pt" style:font-size-complex="14pt"/>
    </style:style>
    <style:style style:name="T33" style:family="text">
      <style:text-properties style:text-position="0% 100%"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56.083cm" svg:y1="33.758cm" svg:x2="56.083cm" svg:y2="60.092cm">
          <text:p/>
        </draw:line>
        <draw:custom-shape draw:style-name="gr2" draw:text-style-name="P3" draw:layer="layout" svg:width="8.347cm" svg:height="3.709cm" svg:x="71.357cm" svg:y="64.281cm">
          <text:p text:style-name="P2"><text:span text:style-name="T1">Crossing of the Jordan</text:span></text:p>
          <text:p text:style-name="P2"><text:span text:style-name="T2">(43</text:span><text:span text:style-name="T3">rd</text:span><text:span text:style-name="T2"> year, 1</text:span><text:span text:style-name="T3">st</text:span><text:span text:style-name="T2"> month, 10</text:span><text:span text:style-name="T3">th</text:span><text:span text:style-name="T2"> day)</text:span></text:p>
          <text:p text:style-name="P2"><text:span text:style-name="T2"/></text:p>
          <text:p text:style-name="P2"><text:span text:style-name="T4">Joshua 14:15</text:span><text:span text:style-name="T2"> “..And the land had rest from war.”</text:span></text:p>
          <text:p text:style-name="P2"><text:span text:style-name="T2">This is the end of the “United Conquest” and the beginning of the “Tribal Occupation &amp; Possession”.</text:span></text:p>
          <text:p text:style-name="P2"><text:span text:style-name="T2"/></text:p>
          <text:p text:style-name="P2"><text:span text:style-name="T2">The “United Conquest” took a minimum of </text:span></text:p>
          <text:p text:style-name="P2"><text:span text:style-name="T2">1,431 days (3 years, 11 months, 21 days)</text:span></text:p>
          <text:p text:style-name="P2"><text:span text:style-name="T2">to a maximum of</text:span></text:p>
          <text:p text:style-name="P2"><text:span text:style-name="T2">1,790 days (4 years, 11 months, 20 days)</text:span></text:p>
          <draw:enhanced-geometry svg:viewBox="0 0 21600 21600" draw:text-areas="800 800 20800 20800" draw:type="round-rectangular-callout" draw:modifiers="-2980.73790129372 17390.61994609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3" draw:text-style-name="P1" draw:layer="layout" svg:x1="70.053cm" svg:y1="73.459cm" svg:x2="70.053cm" svg:y2="70.284cm">
          <text:p/>
        </draw:line>
        <draw:line draw:style-name="gr4" draw:text-style-name="P4" draw:layer="layout" svg:x1="70.053cm" svg:y1="73.459cm" svg:x2="70.053cm" svg:y2="75.967cm">
          <text:p/>
        </draw:line>
        <draw:line draw:style-name="gr5" draw:text-style-name="P1" draw:layer="layout" svg:x1="69.036cm" svg:y1="75.047cm" svg:x2="69.036cm" svg:y2="73.46cm">
          <text:p/>
        </draw:line>
        <draw:line draw:style-name="gr3" draw:text-style-name="P1" draw:layer="layout" svg:x1="69.063cm" svg:y1="67.263cm" svg:x2="69.063cm" svg:y2="73.46cm">
          <text:p/>
        </draw:line>
        <draw:line draw:style-name="gr6" draw:text-style-name="P1" draw:layer="layout" svg:x1="43.335cm" svg:y1="75.259cm" svg:x2="57.125cm" svg:y2="75.249cm">
          <text:p text:style-name="P5"/>
          <text:p text:style-name="P5">543 <text:s text:c="129"/></text:p>
        </draw:line>
        <draw:line draw:style-name="gr6" draw:text-style-name="P1" draw:layer="layout" svg:x1="43.332cm" svg:y1="60.108cm" svg:x2="52.934cm" svg:y2="60.108cm">
          <text:p text:style-name="P5"/>
          <text:p text:style-name="P5">378 <text:s text:c="86"/></text:p>
        </draw:line>
        <draw:line draw:style-name="gr6" draw:text-style-name="P1" draw:layer="layout" svg:x1="43.332cm" svg:y1="50.265cm" svg:x2="48.971cm" svg:y2="50.265cm">
          <text:p text:style-name="P5"/>
          <text:p text:style-name="P5">222 <text:s text:c="45"/></text:p>
        </draw:line>
        <draw:line draw:style-name="gr6" draw:text-style-name="P1" draw:layer="layout" svg:x1="43.335cm" svg:y1="47.909cm" svg:x2="48.235cm" svg:y2="47.909cm">
          <text:p text:style-name="P5"/>
          <text:p text:style-name="P5">193 <text:s text:c="38"/></text:p>
        </draw:line>
        <draw:line draw:style-name="gr6" draw:text-style-name="P1" draw:layer="layout" svg:x1="43.335cm" svg:y1="45.561cm" svg:x2="47.46cm" svg:y2="45.559cm">
          <text:p text:style-name="P5"/>
          <text:p text:style-name="P5">162 <text:s text:c="30"/></text:p>
        </draw:line>
        <draw:line draw:style-name="gr6" draw:text-style-name="P1" draw:layer="layout" svg:x1="43.335cm" svg:y1="43.184cm" svg:x2="46.66cm" svg:y2="43.184cm">
          <text:p text:style-name="P5"/>
          <text:p text:style-name="P5">131 <text:s text:c="22"/></text:p>
        </draw:line>
        <draw:line draw:style-name="gr6" draw:text-style-name="P1" draw:layer="layout" svg:x1="43.335cm" svg:y1="38.51cm" svg:x2="45.034cm" svg:y2="38.509cm">
          <text:p text:style-name="P5"/>
          <text:p text:style-name="P5">67 <text:s text:c="7"/></text:p>
        </draw:line>
        <draw:custom-shape draw:style-name="gr7" draw:text-style-name="P7" draw:layer="layout" svg:width="3.734cm" svg:height="1.588cm" svg:x="54.813cm" svg:y="65.838cm">
          <text:p text:style-name="P6"><text:span text:style-name="T5">Jacob <text:s text:c="5"/></text:span></text:p>
          <text:p text:style-name="P6"><text:span text:style-name="T5">147 <text:s text:c="5"/></text:span></text:p>
          <draw:enhanced-geometry svg:viewBox="0 0 21600 21600" draw:type="rectangle" draw:enhanced-path="M 0 0 L 21600 0 21600 21600 0 21600 0 0 Z N"/>
        </draw:custom-shape>
        <draw:line draw:style-name="gr8" draw:text-style-name="P4" draw:layer="layout" svg:x1="58.115cm" svg:y1="67.426cm" svg:x2="58.115cm" svg:y2="75.249cm">
          <text:p text:style-name="P5"><text:span text:style-name="T6">Gen 45:6, 47:9</text:span></text:p>
          <text:p text:style-name="P5"><text:span text:style-name="T6"/></text:p>
        </draw:line>
        <draw:line draw:style-name="gr9" draw:text-style-name="P9" draw:layer="layout" svg:x1="52.934cm" svg:y1="54.199cm" svg:x2="52.934cm" svg:y2="58.697cm">
          <text:p text:style-name="P8"><text:span text:style-name="T7">86 <text:s text:c="28"/></text:span></text:p>
          <text:p text:style-name="P8"><text:span text:style-name="T7"/></text:p>
        </draw:line>
        <draw:line draw:style-name="gr10" draw:text-style-name="P10" draw:layer="layout" svg:x1="52.934cm" svg:y1="58.697cm" svg:x2="52.934cm" svg:y2="60.092cm">
          <text:p text:style-name="P5"><text:span text:style-name="T2">2034AM</text:span></text:p>
          <text:p text:style-name="P5"><text:span text:style-name="T2"/></text:p>
        </draw:line>
        <draw:custom-shape draw:style-name="gr11" draw:text-style-name="P7" draw:layer="layout" svg:width="15.24cm" svg:height="1.588cm" svg:x="40.843cm" svg:y="30.443cm">
          <text:p text:style-name="P6"><text:span text:style-name="T5">Shem</text:span></text:p>
          <text:p text:style-name="P6"><text:span text:style-name="T5">600</text:span></text:p>
          <draw:enhanced-geometry svg:viewBox="0 0 21600 21600" draw:type="rectangle" draw:enhanced-path="M 0 0 L 21600 0 21600 21600 0 21600 0 0 Z N"/>
        </draw:custom-shape>
        <draw:line draw:style-name="gr6" draw:text-style-name="P1" draw:layer="layout" svg:x1="40.286cm" svg:y1="24.2cm" svg:x2="43.206cm" svg:y2="24.2cm">
          <text:p text:style-name="P5"/>
          <text:p text:style-name="P5">115</text:p>
        </draw:line>
        <draw:line draw:style-name="gr12" draw:text-style-name="P11" draw:layer="layout" svg:x1="43.332cm" svg:y1="1.27cm" svg:x2="43.335cm" svg:y2="81.295cm">
          <text:p/>
        </draw:line>
        <draw:line draw:style-name="gr13" draw:text-style-name="P1" draw:layer="layout" svg:x1="40.286cm" svg:y1="1.27cm" svg:x2="40.286cm" svg:y2="81.305cm">
          <text:p/>
        </draw:line>
        <draw:line draw:style-name="gr5" draw:text-style-name="P1" draw:layer="layout" svg:x1="53.315cm" svg:y1="48.417cm" svg:x2="53.315cm" svg:y2="47.147cm">
          <text:p/>
        </draw:line>
        <draw:line draw:style-name="gr14" draw:text-style-name="P12" draw:layer="layout" svg:x1="53.289cm" svg:y1="54.2cm" svg:x2="53.289cm" svg:y2="63.488cm">
          <text:p/>
        </draw:line>
        <draw:custom-shape draw:style-name="gr15" draw:text-style-name="P13" draw:layer="layout" svg:width="3.226cm" svg:height="1.588cm" svg:x="50.495cm" svg:y="57.109cm">
          <text:p text:style-name="P6"><text:span text:style-name="T5">Sarai/Sarah</text:span></text:p>
          <text:p text:style-name="P6"><text:span text:style-name="T5">127</text:span></text:p>
          <draw:enhanced-geometry svg:viewBox="0 0 21600 21600" draw:type="rectangle" draw:enhanced-path="M 0 0 L 21600 0 21600 21600 0 21600 0 0 Z N"/>
        </draw:custom-shape>
        <draw:line draw:style-name="gr16" draw:text-style-name="P14" draw:layer="layout" svg:x1="53.264cm" svg:y1="54.2cm" svg:x2="53.264cm" svg:y2="60.093cm">
          <text:p text:style-name="P8"><text:span text:style-name="T8"/></text:p>
          <text:p text:style-name="P8"><text:span text:style-name="T8">(99) circumcised (13)</text:span></text:p>
          <text:p text:style-name="P8"><text:span text:style-name="T8"/></text:p>
          <text:p text:style-name="P8"><text:span text:style-name="T8"/></text:p>
        </draw:line>
        <draw:custom-shape draw:style-name="gr17" draw:text-style-name="P7" draw:layer="layout" svg:width="24.613cm" svg:height="1.588cm" svg:x="18.72cm" svg:y="21.914cm">
          <text:p text:style-name="P6"><text:span text:style-name="T5">Methuselah</text:span></text:p>
          <text:p text:style-name="P6"><text:span text:style-name="T5">969</text:span></text:p>
          <draw:enhanced-geometry svg:viewBox="0 0 21600 21600" draw:type="rectangle" draw:enhanced-path="M 0 0 L 21600 0 21600 21600 0 21600 0 0 Z N"/>
        </draw:custom-shape>
        <draw:line draw:style-name="gr18" draw:text-style-name="P15" draw:layer="layout" svg:x1="23.47cm" svg:y1="23.503cm" svg:x2="23.47cm" svg:y2="24.773cm">
          <text:p text:style-name="P5"><text:span text:style-name="T9">187</text:span></text:p>
          <text:p text:style-name="P5"><text:span text:style-name="T9"/></text:p>
        </draw:line>
        <draw:custom-shape draw:style-name="gr19" draw:text-style-name="P7" draw:layer="layout" svg:width="19.736cm" svg:height="1.588cm" svg:x="23.47cm" svg:y="24.674cm">
          <text:p text:style-name="P6"><text:span text:style-name="T5">Lamech</text:span></text:p>
          <text:p text:style-name="P6"><text:span text:style-name="T5">777</text:span></text:p>
          <draw:enhanced-geometry svg:viewBox="0 0 21600 21600" draw:type="rectangle" draw:enhanced-path="M 0 0 L 21600 0 21600 21600 0 21600 0 0 Z N"/>
        </draw:custom-shape>
        <draw:line draw:style-name="gr18" draw:text-style-name="P15" draw:layer="layout" svg:x1="28.093cm" svg:y1="26.269cm" svg:x2="28.093cm" svg:y2="27.539cm">
          <text:p text:style-name="P5"><text:span text:style-name="T9">182</text:span></text:p>
          <text:p text:style-name="P5"><text:span text:style-name="T9"/></text:p>
        </draw:line>
        <draw:custom-shape draw:style-name="gr20" draw:text-style-name="P7" draw:layer="layout" svg:width="24.13cm" svg:height="1.588cm" svg:x="28.093cm" svg:y="27.539cm">
          <text:p text:style-name="P6"><text:span text:style-name="T5"><text:s text:c="24"/>Noah</text:span></text:p>
          <text:p text:style-name="P6"><text:span text:style-name="T5"><text:s text:c="24"/>950</text:span></text:p>
          <draw:enhanced-geometry svg:viewBox="0 0 21600 21600" draw:type="rectangle" draw:enhanced-path="M 0 0 L 21600 0 21600 21600 0 21600 0 0 Z N"/>
        </draw:custom-shape>
        <draw:line draw:style-name="gr6" draw:text-style-name="P16" draw:layer="layout" svg:x1="43.206cm" svg:y1="24.674cm" svg:x2="43.333cm" svg:y2="24.674cm">
          <text:p text:style-name="P5"><text:span text:style-name="T10"/></text:p>
          <text:p text:style-name="P5"><text:span text:style-name="T10">5</text:span></text:p>
        </draw:line>
        <draw:custom-shape draw:style-name="gr21" draw:text-style-name="P7" draw:layer="layout" svg:width="9.271cm" svg:height="1.588cm" svg:x="17.069cm" svg:y="19.056cm">
          <text:p text:style-name="P6"><text:span text:style-name="T5">Enoch</text:span></text:p>
          <text:p text:style-name="P6"><text:span text:style-name="T5">365</text:span></text:p>
          <draw:enhanced-geometry svg:viewBox="0 0 21600 21600" draw:type="rectangle" draw:enhanced-path="M 0 0 L 21600 0 21600 21600 0 21600 0 0 Z N"/>
        </draw:custom-shape>
        <draw:line draw:style-name="gr18" draw:text-style-name="P15" draw:layer="layout" svg:x1="18.72cm" svg:y1="20.644cm" svg:x2="18.72cm" svg:y2="21.914cm">
          <text:p text:style-name="P5"><text:span text:style-name="T9">65</text:span></text:p>
          <text:p text:style-name="P5"><text:span text:style-name="T9"/></text:p>
        </draw:line>
        <draw:custom-shape draw:style-name="gr22" draw:text-style-name="P7" draw:layer="layout" svg:width="24.435cm" svg:height="1.588cm" svg:x="12.954cm" svg:y="16.198cm">
          <text:p text:style-name="P6"><text:span text:style-name="T5">Jared</text:span></text:p>
          <text:p text:style-name="P6"><text:span text:style-name="T5">962</text:span></text:p>
          <draw:enhanced-geometry svg:viewBox="0 0 21600 21600" draw:type="rectangle" draw:enhanced-path="M 0 0 L 21600 0 21600 21600 0 21600 0 0 Z N"/>
        </draw:custom-shape>
        <draw:line draw:style-name="gr18" draw:text-style-name="P15" draw:layer="layout" svg:x1="17.069cm" svg:y1="17.786cm" svg:x2="17.069cm" svg:y2="19.056cm">
          <text:p text:style-name="P5"><text:span text:style-name="T9">162</text:span></text:p>
          <text:p text:style-name="P5"><text:span text:style-name="T9"/></text:p>
        </draw:line>
        <draw:line draw:style-name="gr18" draw:text-style-name="P15" draw:layer="layout" svg:x1="12.954cm" svg:y1="14.928cm" svg:x2="12.954cm" svg:y2="16.198cm">
          <text:p text:style-name="P5"><text:span text:style-name="T9">65</text:span></text:p>
          <text:p text:style-name="P5"><text:span text:style-name="T9"/></text:p>
        </draw:line>
        <draw:custom-shape draw:style-name="gr23" draw:text-style-name="P7" draw:layer="layout" svg:width="22.733cm" svg:height="1.588cm" svg:x="11.303cm" svg:y="13.34cm">
          <text:p text:style-name="P6"><text:span text:style-name="T5">Mahalaleel</text:span></text:p>
          <text:p text:style-name="P6"><text:span text:style-name="T5">895</text:span></text:p>
          <draw:enhanced-geometry svg:viewBox="0 0 21600 21600" draw:type="rectangle" draw:enhanced-path="M 0 0 L 21600 0 21600 21600 0 21600 0 0 Z N"/>
        </draw:custom-shape>
        <draw:line draw:style-name="gr18" draw:text-style-name="P15" draw:layer="layout" svg:x1="11.303cm" svg:y1="12.09cm" svg:x2="11.303cm" svg:y2="13.36cm">
          <text:p text:style-name="P5"><text:span text:style-name="T9">70</text:span></text:p>
          <text:p text:style-name="P5"><text:span text:style-name="T9"/></text:p>
        </draw:line>
        <draw:custom-shape draw:style-name="gr24" draw:text-style-name="P7" draw:layer="layout" svg:width="23.114cm" svg:height="1.588cm" svg:x="9.525cm" svg:y="10.502cm">
          <text:p text:style-name="P6"><text:span text:style-name="T5">Cainan</text:span></text:p>
          <text:p text:style-name="P6"><text:span text:style-name="T5">910</text:span></text:p>
          <draw:enhanced-geometry svg:viewBox="0 0 21600 21600" draw:type="rectangle" draw:enhanced-path="M 0 0 L 21600 0 21600 21600 0 21600 0 0 Z N"/>
        </draw:custom-shape>
        <draw:custom-shape draw:style-name="gr25" draw:text-style-name="P7" draw:layer="layout" svg:width="22.987cm" svg:height="1.588cm" svg:x="7.239cm" svg:y="7.644cm">
          <text:p text:style-name="P6"><text:span text:style-name="T5">Enos</text:span></text:p>
          <text:p text:style-name="P6"><text:span text:style-name="T5">905</text:span></text:p>
          <draw:enhanced-geometry svg:viewBox="0 0 21600 21600" draw:type="rectangle" draw:enhanced-path="M 0 0 L 21600 0 21600 21600 0 21600 0 0 Z N"/>
        </draw:custom-shape>
        <draw:line draw:style-name="gr18" draw:text-style-name="P15" draw:layer="layout" svg:x1="9.525cm" svg:y1="9.232cm" svg:x2="9.525cm" svg:y2="10.502cm">
          <text:p text:style-name="P5"><text:span text:style-name="T9">90</text:span></text:p>
          <text:p text:style-name="P5"><text:span text:style-name="T9"/></text:p>
        </draw:line>
        <draw:custom-shape draw:style-name="gr26" draw:text-style-name="P7" draw:layer="layout" svg:width="23.165cm" svg:height="1.588cm" svg:x="4.572cm" svg:y="4.786cm">
          <text:p text:style-name="P6"><text:span text:style-name="T5">Seth</text:span></text:p>
          <text:p text:style-name="P6"><text:span text:style-name="T5">912</text:span></text:p>
          <draw:enhanced-geometry svg:viewBox="0 0 21600 21600" draw:type="rectangle" draw:enhanced-path="M 0 0 L 21600 0 21600 21600 0 21600 0 0 Z N"/>
        </draw:custom-shape>
        <draw:line draw:style-name="gr18" draw:text-style-name="P15" draw:layer="layout" svg:x1="7.239cm" svg:y1="6.374cm" svg:x2="7.239cm" svg:y2="7.644cm">
          <text:p text:style-name="P5"><text:span text:style-name="T9">105</text:span></text:p>
          <text:p text:style-name="P5"><text:span text:style-name="T9"/></text:p>
        </draw:line>
        <draw:line draw:style-name="gr18" draw:text-style-name="P15" draw:layer="layout" svg:x1="4.572cm" svg:y1="3.516cm" svg:x2="4.572cm" svg:y2="4.786cm">
          <text:p text:style-name="P5"><text:span text:style-name="T9">130</text:span></text:p>
          <text:p text:style-name="P5"><text:span text:style-name="T9"/></text:p>
        </draw:line>
        <draw:custom-shape draw:style-name="gr27" draw:text-style-name="P7" draw:layer="layout" svg:width="23.622cm" svg:height="1.588cm" svg:x="1.27cm" svg:y="1.928cm">
          <text:p text:style-name="P6"><text:span text:style-name="T5">Adam</text:span></text:p>
          <text:p text:style-name="P6"><text:span text:style-name="T5">930</text:span></text:p>
          <draw:enhanced-geometry svg:viewBox="0 0 21600 21600" draw:type="rectangle" draw:enhanced-path="M 0 0 L 21600 0 21600 21600 0 21600 0 0 Z N"/>
        </draw:custom-shape>
        <draw:line draw:style-name="gr28" draw:text-style-name="P18" draw:layer="layout" svg:x1="1.27cm" svg:y1="1.27cm" svg:x2="43.333cm" svg:y2="1.273cm">
          <text:p text:style-name="P17">1656</text:p>
          <text:p text:style-name="P17"/>
        </draw:line>
        <draw:line draw:style-name="gr29" draw:text-style-name="P1" draw:layer="layout" svg:x1="1.27cm" svg:y1="1.27cm" svg:x2="1.27cm" svg:y2="3.516cm">
          <text:p/>
        </draw:line>
        <draw:line draw:style-name="gr6" draw:text-style-name="P1" draw:layer="layout" svg:x1="37.389cm" svg:y1="16.198cm" svg:x2="43.334cm" svg:y2="16.198cm">
          <text:p text:style-name="P5"/>
          <text:p text:style-name="P5">234</text:p>
        </draw:line>
        <draw:line draw:style-name="gr6" draw:text-style-name="P1" draw:layer="layout" svg:x1="34.036cm" svg:y1="13.349cm" svg:x2="43.333cm" svg:y2="13.349cm">
          <text:p text:style-name="P5"/>
          <text:p text:style-name="P5">366</text:p>
        </draw:line>
        <draw:line draw:style-name="gr6" draw:text-style-name="P1" draw:layer="layout" svg:x1="32.639cm" svg:y1="10.502cm" svg:x2="43.333cm" svg:y2="10.501cm">
          <text:p text:style-name="P5"/>
          <text:p text:style-name="P5">421</text:p>
        </draw:line>
        <draw:line draw:style-name="gr6" draw:text-style-name="P1" draw:layer="layout" svg:x1="30.226cm" svg:y1="7.644cm" svg:x2="43.335cm" svg:y2="7.643cm">
          <text:p text:style-name="P5"/>
          <text:p text:style-name="P5">516</text:p>
        </draw:line>
        <draw:line draw:style-name="gr6" draw:text-style-name="P1" draw:layer="layout" svg:x1="27.737cm" svg:y1="4.786cm" svg:x2="43.333cm" svg:y2="4.787cm">
          <text:p text:style-name="P5"/>
          <text:p text:style-name="P5">614</text:p>
        </draw:line>
        <draw:line draw:style-name="gr6" draw:text-style-name="P1" draw:layer="layout" svg:x1="24.892cm" svg:y1="1.928cm" svg:x2="43.333cm" svg:y2="1.927cm">
          <text:p text:style-name="P5"/>
          <text:p text:style-name="P5">726</text:p>
        </draw:line>
        <draw:line draw:style-name="gr6" draw:text-style-name="P1" draw:layer="layout" svg:x1="26.34cm" svg:y1="19.056cm" svg:x2="43.333cm" svg:y2="19.057cm">
          <text:p text:style-name="P5"/>
          <text:p text:style-name="P5">669</text:p>
        </draw:line>
        <draw:line draw:style-name="gr30" draw:text-style-name="P5" draw:layer="layout" svg:x1="43.333cm" svg:y1="2.721cm" svg:x2="47.346cm" svg:y2="2.721cm">
          <text:p text:style-name="P5">Flood 1656AM</text:p>
          <text:p text:style-name="P5">2348BC (Ussher)</text:p>
        </draw:line>
        <draw:line draw:style-name="gr18" draw:text-style-name="P15" draw:layer="layout" svg:x1="26.339cm" svg:y1="17.786cm" svg:x2="26.339cm" svg:y2="19.056cm">
          <text:p text:style-name="P5"><text:span text:style-name="T9">527</text:span></text:p>
          <text:p text:style-name="P5"><text:span text:style-name="T9"/></text:p>
        </draw:line>
        <draw:line draw:style-name="gr30" draw:text-style-name="P5" draw:layer="layout" svg:x1="43.206cm" svg:y1="25.821cm" svg:x2="45.492cm" svg:y2="25.821cm">
          <text:p text:style-name="P5">Lamech</text:p>
          <text:p text:style-name="P5">1651AM</text:p>
        </draw:line>
        <draw:line draw:style-name="gr31" draw:text-style-name="P15" draw:layer="layout" svg:x1="24.892cm" svg:y1="3.516cm" svg:x2="24.892cm" svg:y2="4.786cm">
          <text:p text:style-name="P5"><text:span text:style-name="T9">800</text:span></text:p>
          <text:p text:style-name="P5"><text:span text:style-name="T9"/></text:p>
        </draw:line>
        <draw:line draw:style-name="gr31" draw:text-style-name="P15" draw:layer="layout" svg:x1="27.737cm" svg:y1="6.374cm" svg:x2="27.737cm" svg:y2="7.644cm">
          <text:p text:style-name="P5"><text:span text:style-name="T9">807</text:span></text:p>
          <text:p text:style-name="P5"><text:span text:style-name="T9"/></text:p>
        </draw:line>
        <draw:line draw:style-name="gr31" draw:text-style-name="P15" draw:layer="layout" svg:x1="30.226cm" svg:y1="9.232cm" svg:x2="30.226cm" svg:y2="10.502cm">
          <text:p text:style-name="P5"><text:span text:style-name="T9">815</text:span></text:p>
          <text:p text:style-name="P5"><text:span text:style-name="T9"/></text:p>
        </draw:line>
        <draw:line draw:style-name="gr31" draw:text-style-name="P15" draw:layer="layout" svg:x1="32.639cm" svg:y1="12.07cm" svg:x2="32.639cm" svg:y2="13.34cm">
          <text:p text:style-name="P5"><text:span text:style-name="T9">840</text:span></text:p>
          <text:p text:style-name="P5"><text:span text:style-name="T9"/></text:p>
        </draw:line>
        <draw:line draw:style-name="gr31" draw:text-style-name="P15" draw:layer="layout" svg:x1="34.036cm" svg:y1="14.928cm" svg:x2="34.036cm" svg:y2="16.198cm">
          <text:p text:style-name="P5"><text:span text:style-name="T9">833</text:span></text:p>
          <text:p text:style-name="P5"><text:span text:style-name="T9"/></text:p>
        </draw:line>
        <draw:line draw:style-name="gr31" draw:text-style-name="P15" draw:layer="layout" svg:x1="26.34cm" svg:y1="20.644cm" svg:x2="26.34cm" svg:y2="21.914cm">
          <text:p text:style-name="P5"><text:span text:style-name="T9">300</text:span></text:p>
          <text:p text:style-name="P5"><text:span text:style-name="T9"/></text:p>
        </draw:line>
        <draw:line draw:style-name="gr31" draw:text-style-name="P15" draw:layer="layout" svg:x1="37.374cm" svg:y1="17.786cm" svg:x2="37.374cm" svg:y2="21.914cm">
          <text:p text:style-name="P5"><text:span text:style-name="T9">735</text:span></text:p>
          <text:p text:style-name="P5"><text:span text:style-name="T9"/></text:p>
        </draw:line>
        <draw:line draw:style-name="gr18" draw:text-style-name="P15" draw:layer="layout" svg:x1="43.206cm" svg:y1="23.502cm" svg:x2="43.206cm" svg:y2="24.674cm">
          <text:p text:style-name="P5"><text:span text:style-name="T9"/></text:p>
          <text:p text:style-name="P5"><text:span text:style-name="T9">964</text:span></text:p>
        </draw:line>
        <draw:line draw:style-name="gr31" draw:text-style-name="P15" draw:layer="layout" svg:x1="43.206cm" svg:y1="26.269cm" svg:x2="43.206cm" svg:y2="27.539cm">
          <text:p text:style-name="P5"><text:span text:style-name="T9"/></text:p>
          <text:p text:style-name="P5"><text:span text:style-name="T9">595</text:span></text:p>
        </draw:line>
        <draw:line draw:style-name="gr31" draw:text-style-name="P15" draw:layer="layout" svg:x1="52.222cm" svg:y1="25.507cm" svg:x2="52.222cm" svg:y2="27.539cm">
          <text:p text:style-name="P5"><text:span text:style-name="T9">2006AM</text:span></text:p>
          <text:p text:style-name="P5"><text:span text:style-name="T9"/></text:p>
        </draw:line>
        <draw:line draw:style-name="gr32" draw:text-style-name="P15" draw:layer="layout" svg:x1="43.383cm" svg:y1="29.127cm" svg:x2="43.383cm" svg:y2="32.031cm">
          <text:p text:style-name="P5"><text:span text:style-name="T9">602 <text:s text:c="15"/></text:span></text:p>
          <text:p text:style-name="P5"><text:span text:style-name="T9"/></text:p>
        </draw:line>
        <draw:line draw:style-name="gr33" draw:text-style-name="P19" draw:layer="layout" svg:x1="43.383cm" svg:y1="32.031cm" svg:x2="43.383cm" svg:y2="33.758cm">
          <text:p text:style-name="P8"><text:span text:style-name="T11">1658AM</text:span></text:p>
          <text:p text:style-name="P8"><text:span text:style-name="T11"/></text:p>
        </draw:line>
        <draw:line draw:style-name="gr34" draw:text-style-name="P5" draw:layer="layout" svg:x1="43.383cm" svg:y1="31.315cm" svg:x2="44.653cm" svg:y2="31.315cm">
          <text:p text:style-name="P5">100</text:p>
          <text:p text:style-name="P5"/>
        </draw:line>
        <draw:line draw:style-name="gr35" draw:text-style-name="P1" draw:layer="layout" svg:x1="42.383cm" svg:y1="31.315cm" svg:x2="43.335cm" svg:y2="31.315cm">
          <text:p text:style-name="P5">98</text:p>
          <text:p text:style-name="P5"/>
        </draw:line>
        <draw:line draw:style-name="gr31" draw:text-style-name="P15" draw:layer="layout" svg:x1="52.223cm" svg:y1="29.127cm" svg:x2="52.223cm" svg:y2="30.443cm">
          <text:p text:style-name="P5"><text:span text:style-name="T9"/></text:p>
          <text:p text:style-name="P5"><text:span text:style-name="T9">448</text:span></text:p>
        </draw:line>
        <draw:custom-shape draw:style-name="gr36" draw:text-style-name="P7" draw:layer="layout" svg:width="11.125cm" svg:height="1.588cm" svg:x="43.383cm" svg:y="33.758cm">
          <text:p text:style-name="P6"><text:span text:style-name="T5">Arphaxad</text:span></text:p>
          <text:p text:style-name="P6"><text:span text:style-name="T5">438</text:span></text:p>
          <draw:enhanced-geometry svg:viewBox="0 0 21600 21600" draw:type="rectangle" draw:enhanced-path="M 0 0 L 21600 0 21600 21600 0 21600 0 0 Z N"/>
        </draw:custom-shape>
        <draw:line draw:style-name="gr18" draw:text-style-name="P15" draw:layer="layout" svg:x1="44.272cm" svg:y1="35.346cm" svg:x2="44.272cm" svg:y2="36.159cm">
          <text:p text:style-name="P5"><text:span text:style-name="T9">35</text:span></text:p>
          <text:p text:style-name="P5"><text:span text:style-name="T9"/></text:p>
        </draw:line>
        <draw:custom-shape draw:style-name="gr36" draw:text-style-name="P7" draw:layer="layout" svg:width="11.125cm" svg:height="1.588cm" svg:x="44.272cm" svg:y="36.159cm">
          <text:p text:style-name="P6"><text:span text:style-name="T5">Salah</text:span></text:p>
          <text:p text:style-name="P6"><text:span text:style-name="T5">433</text:span></text:p>
          <draw:enhanced-geometry svg:viewBox="0 0 21600 21600" draw:type="rectangle" draw:enhanced-path="M 0 0 L 21600 0 21600 21600 0 21600 0 0 Z N"/>
        </draw:custom-shape>
        <draw:line draw:style-name="gr32" draw:text-style-name="P15" draw:layer="layout" svg:x1="40.843cm" svg:y1="29.127cm" svg:x2="40.843cm" svg:y2="30.443cm">
          <text:p text:style-name="P5"><text:span text:style-name="T9">502</text:span></text:p>
          <text:p text:style-name="P5"><text:span text:style-name="T9"/></text:p>
        </draw:line>
        <draw:line draw:style-name="gr37" draw:text-style-name="P15" draw:layer="layout" svg:x1="45.034cm" svg:y1="37.747cm" svg:x2="45.034cm" svg:y2="38.509cm">
          <text:p text:style-name="P5"><text:span text:style-name="T9">30</text:span></text:p>
          <text:p text:style-name="P5"><text:span text:style-name="T9"/></text:p>
        </draw:line>
        <draw:custom-shape draw:style-name="gr38" draw:text-style-name="P7" draw:layer="layout" svg:width="11.786cm" svg:height="1.588cm" svg:x="45.034cm" svg:y="38.509cm">
          <text:p text:style-name="P6"><text:span text:style-name="T5">Eber</text:span></text:p>
          <text:p text:style-name="P6"><text:span text:style-name="T5">464</text:span></text:p>
          <draw:enhanced-geometry svg:viewBox="0 0 21600 21600" draw:type="rectangle" draw:enhanced-path="M 0 0 L 21600 0 21600 21600 0 21600 0 0 Z N"/>
        </draw:custom-shape>
        <draw:line draw:style-name="gr37" draw:text-style-name="P15" draw:layer="layout" svg:x1="45.898cm" svg:y1="40.097cm" svg:x2="45.898cm" svg:y2="40.859cm">
          <text:p text:style-name="P5"><text:span text:style-name="T9">34</text:span></text:p>
          <text:p text:style-name="P5"><text:span text:style-name="T9"/></text:p>
        </draw:line>
        <draw:custom-shape draw:style-name="gr39" draw:text-style-name="P7" draw:layer="layout" svg:width="6.071cm" svg:height="1.588cm" svg:x="45.898cm" svg:y="40.859cm">
          <text:p text:style-name="P6"><text:span text:style-name="T5">Peleg</text:span></text:p>
          <text:p text:style-name="P6"><text:span text:style-name="T5">239</text:span></text:p>
          <draw:enhanced-geometry svg:viewBox="0 0 21600 21600" draw:type="rectangle" draw:enhanced-path="M 0 0 L 21600 0 21600 21600 0 21600 0 0 Z N"/>
        </draw:custom-shape>
        <draw:line draw:style-name="gr37" draw:text-style-name="P15" draw:layer="layout" svg:x1="46.66cm" svg:y1="42.447cm" svg:x2="46.66cm" svg:y2="43.209cm">
          <text:p text:style-name="P5"><text:span text:style-name="T9">30</text:span></text:p>
          <text:p text:style-name="P5"><text:span text:style-name="T9"/></text:p>
        </draw:line>
        <draw:custom-shape draw:style-name="gr39" draw:text-style-name="P7" draw:layer="layout" svg:width="6.071cm" svg:height="1.588cm" svg:x="46.66cm" svg:y="43.209cm">
          <text:p text:style-name="P6"><text:span text:style-name="T5">Reu</text:span></text:p>
          <text:p text:style-name="P6"><text:span text:style-name="T5">239</text:span></text:p>
          <draw:enhanced-geometry svg:viewBox="0 0 21600 21600" draw:type="rectangle" draw:enhanced-path="M 0 0 L 21600 0 21600 21600 0 21600 0 0 Z N"/>
        </draw:custom-shape>
        <draw:line draw:style-name="gr37" draw:text-style-name="P15" draw:layer="layout" svg:x1="47.473cm" svg:y1="44.797cm" svg:x2="47.473cm" svg:y2="45.559cm">
          <text:p text:style-name="P5"><text:span text:style-name="T9">32</text:span></text:p>
          <text:p text:style-name="P5"><text:span text:style-name="T9"/></text:p>
        </draw:line>
        <draw:custom-shape draw:style-name="gr40" draw:text-style-name="P7" draw:layer="layout" svg:width="5.842cm" svg:height="1.588cm" svg:x="47.473cm" svg:y="45.559cm">
          <text:p text:style-name="P6"><text:span text:style-name="T5">Serug</text:span></text:p>
          <text:p text:style-name="P6"><text:span text:style-name="T5">230</text:span></text:p>
          <draw:enhanced-geometry svg:viewBox="0 0 21600 21600" draw:type="rectangle" draw:enhanced-path="M 0 0 L 21600 0 21600 21600 0 21600 0 0 Z N"/>
        </draw:custom-shape>
        <draw:line draw:style-name="gr37" draw:text-style-name="P15" draw:layer="layout" svg:x1="48.235cm" svg:y1="47.147cm" svg:x2="48.235cm" svg:y2="47.909cm">
          <text:p text:style-name="P5"><text:span text:style-name="T9">30</text:span></text:p>
          <text:p text:style-name="P5"><text:span text:style-name="T9"/></text:p>
        </draw:line>
        <draw:custom-shape draw:style-name="gr41" draw:text-style-name="P7" draw:layer="layout" svg:width="3.759cm" svg:height="1.588cm" svg:x="48.235cm" svg:y="47.909cm">
          <text:p text:style-name="P6"><text:span text:style-name="T5">Nahor</text:span></text:p>
          <text:p text:style-name="P6"><text:span text:style-name="T5">148</text:span></text:p>
          <draw:enhanced-geometry svg:viewBox="0 0 21600 21600" draw:type="rectangle" draw:enhanced-path="M 0 0 L 21600 0 21600 21600 0 21600 0 0 Z N"/>
        </draw:custom-shape>
        <draw:line draw:style-name="gr37" draw:text-style-name="P15" draw:layer="layout" svg:x1="48.971cm" svg:y1="49.497cm" svg:x2="48.971cm" svg:y2="50.259cm">
          <text:p text:style-name="P5"><text:span text:style-name="T9">29</text:span></text:p>
          <text:p text:style-name="P5"><text:span text:style-name="T9"/></text:p>
        </draw:line>
        <draw:custom-shape draw:style-name="gr42" draw:text-style-name="P7" draw:layer="layout" svg:width="5.207cm" svg:height="1.588cm" svg:x="48.971cm" svg:y="50.259cm">
          <text:p text:style-name="P6"><text:span text:style-name="T5">Terah</text:span></text:p>
          <text:p text:style-name="P6"><text:span text:style-name="T5">205</text:span></text:p>
          <draw:enhanced-geometry svg:viewBox="0 0 21600 21600" draw:type="rectangle" draw:enhanced-path="M 0 0 L 21600 0 21600 21600 0 21600 0 0 Z N"/>
        </draw:custom-shape>
        <draw:line draw:style-name="gr37" draw:text-style-name="P15" draw:layer="layout" svg:x1="50.749cm" svg:y1="51.847cm" svg:x2="50.749cm" svg:y2="52.609cm">
          <text:p text:style-name="P5"><text:span text:style-name="T9">70</text:span></text:p>
          <text:p text:style-name="P5"><text:span text:style-name="T9"/></text:p>
        </draw:line>
        <draw:custom-shape draw:style-name="gr43" draw:text-style-name="P7" draw:layer="layout" svg:width="4.445cm" svg:height="1.588cm" svg:x="50.749cm" svg:y="52.609cm">
          <text:p text:style-name="P6"><text:span text:style-name="T5">Abram/Abraham</text:span></text:p>
          <text:p text:style-name="P6"><text:span text:style-name="T5">175</text:span></text:p>
          <draw:enhanced-geometry svg:viewBox="0 0 21600 21600" draw:type="rectangle" draw:enhanced-path="M 0 0 L 21600 0 21600 21600 0 21600 0 0 Z N"/>
        </draw:custom-shape>
        <draw:line draw:style-name="gr44" draw:text-style-name="P19" draw:layer="layout" svg:x1="50.749cm" svg:y1="54.197cm" svg:x2="50.749cm" svg:y2="55.924cm">
          <text:p text:style-name="P8"><text:span text:style-name="T12">1948</text:span><text:span text:style-name="T11">AM</text:span></text:p>
          <text:p text:style-name="P8"><text:span text:style-name="T11"/></text:p>
        </draw:line>
        <draw:line draw:style-name="gr18" draw:text-style-name="P15" draw:layer="layout" svg:x1="4.572cm" svg:y1="6.374cm" svg:x2="4.572cm" svg:y2="7.949cm">
          <text:p text:style-name="P5"><text:span text:style-name="T9">130AM</text:span></text:p>
          <text:p text:style-name="P5"><text:span text:style-name="T9"/></text:p>
        </draw:line>
        <draw:line draw:style-name="gr18" draw:text-style-name="P15" draw:layer="layout" svg:x1="7.239cm" svg:y1="9.232cm" svg:x2="7.239cm" svg:y2="10.959cm">
          <text:p text:style-name="P5"><text:span text:style-name="T9">235AM</text:span></text:p>
          <text:p text:style-name="P5"><text:span text:style-name="T9"/></text:p>
        </draw:line>
        <draw:line draw:style-name="gr18" draw:text-style-name="P15" draw:layer="layout" svg:x1="9.525cm" svg:y1="12.09cm" svg:x2="9.525cm" svg:y2="13.817cm">
          <text:p text:style-name="P5"><text:span text:style-name="T9">325AM</text:span></text:p>
          <text:p text:style-name="P5"><text:span text:style-name="T9"/></text:p>
        </draw:line>
        <draw:line draw:style-name="gr18" draw:text-style-name="P15" draw:layer="layout" svg:x1="11.303cm" svg:y1="14.928cm" svg:x2="11.303cm" svg:y2="16.655cm">
          <text:p text:style-name="P5"><text:span text:style-name="T9">395AM</text:span></text:p>
          <text:p text:style-name="P5"><text:span text:style-name="T9"/></text:p>
        </draw:line>
        <draw:line draw:style-name="gr18" draw:text-style-name="P15" draw:layer="layout" svg:x1="12.954cm" svg:y1="17.786cm" svg:x2="12.954cm" svg:y2="19.513cm">
          <text:p text:style-name="P5"><text:span text:style-name="T9">460AM</text:span></text:p>
          <text:p text:style-name="P5"><text:span text:style-name="T9"/></text:p>
        </draw:line>
        <draw:line draw:style-name="gr18" draw:text-style-name="P15" draw:layer="layout" svg:x1="17.069cm" svg:y1="20.644cm" svg:x2="17.069cm" svg:y2="22.371cm">
          <text:p text:style-name="P5"><text:span text:style-name="T9">622AM</text:span></text:p>
          <text:p text:style-name="P5"><text:span text:style-name="T9"/></text:p>
        </draw:line>
        <draw:line draw:style-name="gr18" draw:text-style-name="P15" draw:layer="layout" svg:x1="18.72cm" svg:y1="23.502cm" svg:x2="18.72cm" svg:y2="25.229cm">
          <text:p text:style-name="P5"><text:span text:style-name="T9">687AM</text:span></text:p>
          <text:p text:style-name="P5"><text:span text:style-name="T9"/></text:p>
        </draw:line>
        <draw:line draw:style-name="gr18" draw:text-style-name="P15" draw:layer="layout" svg:x1="23.47cm" svg:y1="26.262cm" svg:x2="23.47cm" svg:y2="27.989cm">
          <text:p text:style-name="P5"><text:span text:style-name="T9">874AM</text:span></text:p>
          <text:p text:style-name="P5"><text:span text:style-name="T9"/></text:p>
        </draw:line>
        <draw:line draw:style-name="gr18" draw:text-style-name="P15" draw:layer="layout" svg:x1="28.093cm" svg:y1="29.127cm" svg:x2="28.093cm" svg:y2="30.956cm">
          <text:p text:style-name="P5"><text:span text:style-name="T9">1056AM</text:span></text:p>
          <text:p text:style-name="P5"><text:span text:style-name="T9"/></text:p>
        </draw:line>
        <draw:line draw:style-name="gr18" draw:text-style-name="P15" draw:layer="layout" svg:x1="40.843cm" svg:y1="32.031cm" svg:x2="40.843cm" svg:y2="33.86cm">
          <text:p text:style-name="P5"><text:span text:style-name="T9">1558AM</text:span></text:p>
          <text:p text:style-name="P5"><text:span text:style-name="T9"/></text:p>
        </draw:line>
        <draw:line draw:style-name="gr18" draw:text-style-name="P15" draw:layer="layout" svg:x1="44.272cm" svg:y1="37.747cm" svg:x2="44.272cm" svg:y2="39.576cm">
          <text:p text:style-name="P5"><text:span text:style-name="T9">1693AM</text:span></text:p>
          <text:p text:style-name="P5"><text:span text:style-name="T9"/></text:p>
        </draw:line>
        <draw:line draw:style-name="gr18" draw:text-style-name="P15" draw:layer="layout" svg:x1="45.034cm" svg:y1="40.097cm" svg:x2="45.034cm" svg:y2="41.926cm">
          <text:p text:style-name="P5"><text:span text:style-name="T9">1723AM</text:span></text:p>
          <text:p text:style-name="P5"><text:span text:style-name="T9"/></text:p>
        </draw:line>
        <draw:line draw:style-name="gr18" draw:text-style-name="P15" draw:layer="layout" svg:x1="45.898cm" svg:y1="42.447cm" svg:x2="45.898cm" svg:y2="44.276cm">
          <text:p text:style-name="P5"><text:span text:style-name="T9">1757AM</text:span></text:p>
          <text:p text:style-name="P5"><text:span text:style-name="T9"/></text:p>
        </draw:line>
        <draw:line draw:style-name="gr18" draw:text-style-name="P15" draw:layer="layout" svg:x1="46.66cm" svg:y1="44.797cm" svg:x2="46.66cm" svg:y2="46.626cm">
          <text:p text:style-name="P5"><text:span text:style-name="T9">1787AM</text:span></text:p>
          <text:p text:style-name="P5"><text:span text:style-name="T9"/></text:p>
        </draw:line>
        <draw:line draw:style-name="gr18" draw:text-style-name="P15" draw:layer="layout" svg:x1="47.473cm" svg:y1="47.147cm" svg:x2="47.473cm" svg:y2="48.976cm">
          <text:p text:style-name="P5"><text:span text:style-name="T9">1819AM</text:span></text:p>
          <text:p text:style-name="P5"><text:span text:style-name="T9"/></text:p>
        </draw:line>
        <draw:line draw:style-name="gr18" draw:text-style-name="P15" draw:layer="layout" svg:x1="48.235cm" svg:y1="49.497cm" svg:x2="48.235cm" svg:y2="51.326cm">
          <text:p text:style-name="P5"><text:span text:style-name="T9">1849AM</text:span></text:p>
          <text:p text:style-name="P5"><text:span text:style-name="T9"/></text:p>
        </draw:line>
        <draw:line draw:style-name="gr18" draw:text-style-name="P15" draw:layer="layout" svg:x1="48.971cm" svg:y1="51.847cm" svg:x2="48.971cm" svg:y2="53.676cm">
          <text:p text:style-name="P5"><text:span text:style-name="T9">1878AM</text:span></text:p>
          <text:p text:style-name="P5"><text:span text:style-name="T9"/></text:p>
        </draw:line>
        <draw:line draw:style-name="gr31" draw:text-style-name="P15" draw:layer="layout" svg:x1="56.083cm" svg:y1="28.411cm" svg:x2="56.083cm" svg:y2="30.443cm">
          <text:p text:style-name="P5"><text:span text:style-name="T9">2158AM</text:span></text:p>
          <text:p text:style-name="P5"><text:span text:style-name="T9"/></text:p>
        </draw:line>
        <draw:line draw:style-name="gr31" draw:text-style-name="P4" draw:layer="layout" svg:x1="54.508cm" svg:y1="32.132cm" svg:x2="54.508cm" svg:y2="33.758cm">
          <text:p text:style-name="P5"><text:span text:style-name="T6">2096AM</text:span></text:p>
          <text:p text:style-name="P5"><text:span text:style-name="T6"/></text:p>
        </draw:line>
        <draw:line draw:style-name="gr31" draw:text-style-name="P15" draw:layer="layout" svg:x1="55.397cm" svg:y1="34.127cm" svg:x2="55.397cm" svg:y2="36.159cm">
          <text:p text:style-name="P5"><text:span text:style-name="T9">2131AM</text:span></text:p>
          <text:p text:style-name="P5"><text:span text:style-name="T9"/></text:p>
        </draw:line>
        <draw:line draw:style-name="gr31" draw:text-style-name="P15" draw:layer="layout" svg:x1="56.82cm" svg:y1="36.477cm" svg:x2="56.82cm" svg:y2="38.509cm">
          <text:p text:style-name="P5"><text:span text:style-name="T9">2187AM</text:span></text:p>
          <text:p text:style-name="P5"><text:span text:style-name="T9"/></text:p>
        </draw:line>
        <draw:line draw:style-name="gr31" draw:text-style-name="P15" draw:layer="layout" svg:x1="52.731cm" svg:y1="41.177cm" svg:x2="52.731cm" svg:y2="43.209cm">
          <text:p text:style-name="P5"><text:span text:style-name="T9">2026AM</text:span></text:p>
          <text:p text:style-name="P5"><text:span text:style-name="T9"/></text:p>
        </draw:line>
        <draw:line draw:style-name="gr31" draw:text-style-name="P15" draw:layer="layout" svg:x1="53.315cm" svg:y1="43.527cm" svg:x2="53.315cm" svg:y2="45.559cm">
          <text:p text:style-name="P5"><text:span text:style-name="T9">2049AM</text:span></text:p>
          <text:p text:style-name="P5"><text:span text:style-name="T9"/></text:p>
        </draw:line>
        <draw:line draw:style-name="gr31" draw:text-style-name="P15" draw:layer="layout" svg:x1="54.178cm" svg:y1="48.227cm" svg:x2="54.178cm" svg:y2="50.259cm">
          <text:p text:style-name="P5"><text:span text:style-name="T9">2083AM</text:span></text:p>
          <text:p text:style-name="P5"><text:span text:style-name="T9"/></text:p>
        </draw:line>
        <draw:line draw:style-name="gr31" draw:text-style-name="P15" draw:layer="layout" svg:x1="55.194cm" svg:y1="50.577cm" svg:x2="55.194cm" svg:y2="52.609cm">
          <text:p text:style-name="P5"><text:span text:style-name="T9">2123AM</text:span></text:p>
          <text:p text:style-name="P5"><text:span text:style-name="T9"/></text:p>
        </draw:line>
        <draw:line draw:style-name="gr30" draw:text-style-name="P5" draw:layer="layout" svg:x1="51.969cm" svg:y1="40.862cm" svg:x2="56.82cm" svg:y2="40.862cm">
          <text:p text:style-name="P5">1996AM</text:p>
          <text:p text:style-name="P5">191</text:p>
        </draw:line>
        <draw:line draw:style-name="gr30" draw:text-style-name="P5" draw:layer="layout" svg:x1="51.994cm" svg:y1="47.909cm" svg:x2="54.356cm" svg:y2="47.909cm">
          <text:p text:style-name="P5">1997AM</text:p>
          <text:p text:style-name="P5"/>
        </draw:line>
        <draw:line draw:style-name="gr45" draw:text-style-name="P20" draw:layer="layout" svg:x1="52.653cm" svg:y1="57.109cm" svg:x2="52.653cm" svg:y2="54.198cm">
          <text:p text:style-name="P8"><text:span text:style-name="T13">2023AM (75)</text:span></text:p>
          <text:p text:style-name="P8"><text:span text:style-name="T13"/></text:p>
        </draw:line>
        <draw:line draw:style-name="gr46" draw:text-style-name="P19" draw:layer="layout" svg:x1="52.654cm" svg:y1="59.46cm" svg:x2="52.654cm" svg:y2="58.698cm">
          <text:p text:style-name="P8"><text:span text:style-name="T11">65</text:span></text:p>
          <text:p text:style-name="P8"><text:span text:style-name="T11"/></text:p>
        </draw:line>
        <draw:line draw:style-name="gr10" draw:text-style-name="P15" draw:layer="layout" svg:x1="53.721cm" svg:y1="55.229cm" svg:x2="53.721cm" svg:y2="57.109cm">
          <text:p text:style-name="P5"><text:span text:style-name="T9">2065AM</text:span></text:p>
          <text:p text:style-name="P5"><text:span text:style-name="T9"/></text:p>
        </draw:line>
        <draw:line draw:style-name="gr47" draw:text-style-name="P21" draw:layer="layout" svg:x1="52.908cm" svg:y1="56.94cm" svg:x2="52.908cm" svg:y2="54.197cm">
          <text:p text:style-name="P8"><text:span text:style-name="T14">2033AM (85) Gen 16:3</text:span></text:p>
          <text:p text:style-name="P8"><text:span text:style-name="T14"/></text:p>
        </draw:line>
        <draw:custom-shape draw:style-name="gr48" draw:text-style-name="P7" draw:layer="layout" svg:width="3.48cm" svg:height="1.588cm" svg:x="52.934cm" svg:y="60.092cm">
          <text:p text:style-name="P6"><text:span text:style-name="T5">Ishmael</text:span></text:p>
          <text:p text:style-name="P6"><text:span text:style-name="T5">137</text:span></text:p>
          <draw:enhanced-geometry svg:viewBox="0 0 21600 21600" draw:type="rectangle" draw:enhanced-path="M 0 0 L 21600 0 21600 21600 0 21600 0 0 Z N"/>
        </draw:custom-shape>
        <draw:custom-shape draw:style-name="gr49" draw:text-style-name="P7" draw:layer="layout" svg:width="4.572cm" svg:height="1.588cm" svg:x="53.289cm" svg:y="63.488cm">
          <text:p text:style-name="P6"><text:span text:style-name="T5">Isaac</text:span></text:p>
          <text:p text:style-name="P6"><text:span text:style-name="T5">180</text:span></text:p>
          <draw:enhanced-geometry svg:viewBox="0 0 21600 21600" draw:type="rectangle" draw:enhanced-path="M 0 0 L 21600 0 21600 21600 0 21600 0 0 Z N"/>
        </draw:custom-shape>
        <draw:line draw:style-name="gr50" draw:text-style-name="P15" draw:layer="layout" svg:x1="50.495cm" svg:y1="58.697cm" svg:x2="50.495cm" svg:y2="60.526cm">
          <text:p text:style-name="P5"><text:span text:style-name="T9">1938AM</text:span></text:p>
          <text:p text:style-name="P5"><text:span text:style-name="T9"/></text:p>
        </draw:line>
        <draw:line draw:style-name="gr50" draw:text-style-name="P22" draw:layer="layout" svg:x1="52.934cm" svg:y1="61.68cm" svg:x2="52.934cm" svg:y2="63.488cm">
          <text:p text:style-name="P5"><text:span text:style-name="T15">2034AM</text:span></text:p>
          <text:p text:style-name="P5"><text:span text:style-name="T15"/></text:p>
        </draw:line>
        <draw:line draw:style-name="gr50" draw:text-style-name="P15" draw:layer="layout" svg:x1="53.289cm" svg:y1="65.076cm" svg:x2="53.289cm" svg:y2="67.006cm">
          <text:p text:style-name="P5"><text:span text:style-name="T9">2048AM</text:span></text:p>
          <text:p text:style-name="P5"><text:span text:style-name="T9"/></text:p>
        </draw:line>
        <draw:line draw:style-name="gr10" draw:text-style-name="P15" draw:layer="layout" svg:x1="56.414cm" svg:y1="58.212cm" svg:x2="56.414cm" svg:y2="60.092cm">
          <text:p text:style-name="P5"><text:span text:style-name="T9">2171AM</text:span></text:p>
          <text:p text:style-name="P5"><text:span text:style-name="T9"/></text:p>
        </draw:line>
        <draw:line draw:style-name="gr10" draw:text-style-name="P15" draw:layer="layout" svg:x1="57.861cm" svg:y1="61.68cm" svg:x2="57.861cm" svg:y2="63.488cm">
          <text:p text:style-name="P5"><text:span text:style-name="T9">2228AM</text:span></text:p>
          <text:p text:style-name="P5"><text:span text:style-name="T9"/></text:p>
        </draw:line>
        <draw:line draw:style-name="gr6" draw:text-style-name="P10" draw:layer="layout" svg:x1="52.934cm" svg:y1="63.488cm" svg:x2="53.289cm" svg:y2="63.488cm">
          <text:p text:style-name="P5"><text:span text:style-name="T2"/></text:p>
          <text:p text:style-name="P5"><text:span text:style-name="T2">14</text:span></text:p>
        </draw:line>
        <draw:line draw:style-name="gr6" draw:text-style-name="P1" draw:layer="layout" svg:x1="56.414cm" svg:y1="61.68cm" svg:x2="57.861cm" svg:y2="61.68cm">
          <text:p text:style-name="P5"/>
          <text:p text:style-name="P5">57</text:p>
        </draw:line>
        <draw:line draw:style-name="gr6" draw:text-style-name="P1" draw:layer="layout" svg:x1="53.721cm" svg:y1="58.697cm" svg:x2="56.414cm" svg:y2="58.697cm">
          <text:p text:style-name="P5"/>
          <text:p text:style-name="P5">106</text:p>
        </draw:line>
        <draw:line draw:style-name="gr5" draw:text-style-name="P1" draw:layer="layout" svg:x1="55.194cm" svg:y1="54.148cm" svg:x2="55.194cm" svg:y2="57.109cm">
          <text:p/>
        </draw:line>
        <draw:line draw:style-name="gr6" draw:text-style-name="P1" draw:layer="layout" svg:x1="53.721cm" svg:y1="57.109cm" svg:x2="55.194cm" svg:y2="57.109cm">
          <text:p text:style-name="P5"/>
          <text:p text:style-name="P5">58</text:p>
        </draw:line>
        <draw:line draw:style-name="gr6" draw:text-style-name="P1" draw:layer="layout" svg:x1="54.178cm" svg:y1="51.847cm" svg:x2="55.194cm" svg:y2="51.847cm">
          <text:p text:style-name="P5"/>
          <text:p text:style-name="P5">40</text:p>
        </draw:line>
        <draw:line draw:style-name="gr6" draw:text-style-name="P1" draw:layer="layout" svg:x1="51.994cm" svg:y1="49.497cm" svg:x2="54.178cm" svg:y2="49.497cm">
          <text:p text:style-name="P5"/>
          <text:p text:style-name="P5">86</text:p>
        </draw:line>
        <draw:line draw:style-name="gr6" draw:text-style-name="P1" draw:layer="layout" svg:x1="51.994cm" svg:y1="48.426cm" svg:x2="53.315cm" svg:y2="48.426cm">
          <text:p text:style-name="P5"/>
          <text:p text:style-name="P5">52</text:p>
        </draw:line>
        <draw:line draw:style-name="gr6" draw:text-style-name="P1" draw:layer="layout" svg:x1="52.731cm" svg:y1="44.797cm" svg:x2="53.315cm" svg:y2="44.797cm">
          <text:p text:style-name="P5"/>
          <text:p text:style-name="P5">23</text:p>
        </draw:line>
        <draw:line draw:style-name="gr6" draw:text-style-name="P1" draw:layer="layout" svg:x1="51.969cm" svg:y1="42.447cm" svg:x2="52.731cm" svg:y2="42.447cm">
          <text:p text:style-name="P5"/>
          <text:p text:style-name="P5">30</text:p>
        </draw:line>
        <draw:line draw:style-name="gr5" draw:text-style-name="P1" draw:layer="layout" svg:x1="56.82cm" svg:y1="40.097cm" svg:x2="56.82cm" svg:y2="40.862cm">
          <text:p/>
        </draw:line>
        <draw:line draw:style-name="gr6" draw:text-style-name="P1" draw:layer="layout" svg:x1="55.397cm" svg:y1="37.747cm" svg:x2="56.82cm" svg:y2="37.747cm">
          <text:p text:style-name="P5"/>
          <text:p text:style-name="P5">56</text:p>
        </draw:line>
        <draw:line draw:style-name="gr6" draw:text-style-name="P1" draw:layer="layout" svg:x1="54.508cm" svg:y1="35.346cm" svg:x2="55.397cm" svg:y2="35.346cm">
          <text:p text:style-name="P5"/>
          <text:p text:style-name="P5">35</text:p>
        </draw:line>
        <draw:line draw:style-name="gr5" draw:text-style-name="P1" draw:layer="layout" svg:x1="56.083cm" svg:y1="32.031cm" svg:x2="56.083cm" svg:y2="33.758cm">
          <text:p/>
        </draw:line>
        <draw:line draw:style-name="gr6" draw:text-style-name="P4" draw:layer="layout" svg:x1="54.508cm" svg:y1="33.758cm" svg:x2="56.083cm" svg:y2="33.758cm">
          <text:p text:style-name="P5"><text:span text:style-name="T6"/></text:p>
          <text:p text:style-name="P5"><text:span text:style-name="T6">62</text:span></text:p>
        </draw:line>
        <draw:line draw:style-name="gr6" draw:text-style-name="P1" draw:layer="layout" svg:x1="52.223cm" svg:y1="29.128cm" svg:x2="56.083cm" svg:y2="29.128cm">
          <text:p text:style-name="P5"/>
          <text:p text:style-name="P5">152</text:p>
        </draw:line>
        <draw:line draw:style-name="gr6" draw:text-style-name="P1" draw:layer="layout" svg:x1="43.206cm" svg:y1="26.262cm" svg:x2="52.222cm" svg:y2="26.262cm">
          <text:p text:style-name="P5"/>
          <text:p text:style-name="P5">355</text:p>
        </draw:line>
        <draw:line draw:style-name="gr50" draw:text-style-name="P1" draw:layer="layout" svg:x1="40.287cm" svg:y1="6.433cm" svg:x2="43.335cm" svg:y2="6.434cm">
          <text:p text:style-name="P5">1536AM</text:p>
          <text:p text:style-name="P5">Gen 6:3</text:p>
        </draw:line>
        <draw:custom-shape draw:style-name="gr51" draw:text-style-name="P3" draw:layer="layout" svg:width="7.62cm" svg:height="4.922cm" svg:x="46.672cm" svg:y="4.587cm">
          <text:p text:style-name="P2"><text:span text:style-name="T2">Jehoiada the priest (</text:span><text:span text:style-name="T4">2Ch 24:15</text:span><text:span text:style-name="T2">) lived to 130 (~1,500 yrs after the flood)</text:span></text:p>
          <text:p text:style-name="P2"><text:span text:style-name="T2"/></text:p>
          <text:p text:style-name="P2"><text:span text:style-name="T2">Since the late 1800s only one person as been verified to live beyond 120 years</text:span></text:p>
          <text:p text:style-name="P2"><text:span text:style-name="T2">(Jeanne Calment; 122 yrs 164 days; died in 1997). </text:span></text:p>
          <text:p text:style-name="P2"><text:span text:style-name="T2"/></text:p>
          <text:p text:style-name="P2"><text:span text:style-name="T2">Since 1997, there has been no one verified to have lived over 120 years.</text:span></text:p>
          <text:p text:style-name="P2"><text:span text:style-name="T2"/></text:p>
          <text:p text:style-name="P2"><text:span text:style-name="T2">So, either God was talking about something that would happen ~4,344 yrs in the future or He was referring to there being 120 yrs until the flood as is supposed here.</text:span></text:p>
          <draw:enhanced-geometry svg:viewBox="0 0 21600 21600" draw:text-areas="800 800 20800 20800" draw:type="round-rectangular-callout" draw:modifiers="-9463.6399422648 8095.06398537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6" draw:text-style-name="P1" draw:layer="layout" svg:x1="37.375cm" svg:y1="20.769cm" svg:x2="40.287cm" svg:y2="20.769cm">
          <text:p text:style-name="P5"/>
          <text:p text:style-name="P5">115</text:p>
        </draw:line>
        <draw:line draw:style-name="gr6" draw:text-style-name="P1" draw:layer="layout" svg:x1="40.286cm" svg:y1="21.914cm" svg:x2="40.286cm" svg:y2="23.502cm">
          <text:p text:style-name="P5">850</text:p>
          <text:p text:style-name="P5"/>
        </draw:line>
        <draw:line draw:style-name="gr6" draw:text-style-name="P1" draw:layer="layout" svg:x1="40.286cm" svg:y1="24.674cm" svg:x2="40.286cm" svg:y2="26.262cm">
          <text:p text:style-name="P5">662</text:p>
          <text:p text:style-name="P5"/>
        </draw:line>
        <draw:line draw:style-name="gr6" draw:text-style-name="P1" draw:layer="layout" svg:x1="40.286cm" svg:y1="27.54cm" svg:x2="40.286cm" svg:y2="29.127cm">
          <text:p text:style-name="P5">480</text:p>
          <text:p text:style-name="P5"/>
        </draw:line>
        <draw:line draw:style-name="gr6" draw:text-style-name="P4" draw:layer="layout" svg:x1="40.286cm" svg:y1="30.443cm" svg:x2="40.843cm" svg:y2="30.443cm">
          <text:p text:style-name="P5"><text:span text:style-name="T6"/></text:p>
          <text:p text:style-name="P5"><text:span text:style-name="T6">22</text:span></text:p>
        </draw:line>
        <draw:line draw:style-name="gr37" draw:text-style-name="P15" draw:layer="layout" svg:x1="54.813cm" svg:y1="65.076cm" svg:x2="54.813cm" svg:y2="65.838cm">
          <text:p text:style-name="P5"><text:span text:style-name="T9">60</text:span></text:p>
          <text:p text:style-name="P5"><text:span text:style-name="T9"/></text:p>
        </draw:line>
        <draw:line draw:style-name="gr5" draw:text-style-name="P1" draw:layer="layout" svg:x1="54.813cm" svg:y1="67.426cm" svg:x2="54.813cm" svg:y2="68.696cm">
          <text:p/>
        </draw:line>
        <draw:line draw:style-name="gr37" draw:text-style-name="P15" draw:layer="layout" svg:x1="54.305cm" svg:y1="65.076cm" svg:x2="54.305cm" svg:y2="69.496cm">
          <text:p text:style-name="P5"><text:span text:style-name="T9">40 (married Rebekah)</text:span></text:p>
          <text:p text:style-name="P5"><text:span text:style-name="T9"/></text:p>
        </draw:line>
        <draw:line draw:style-name="gr10" draw:text-style-name="P15" draw:layer="layout" svg:x1="58.547cm" svg:y1="64.03cm" svg:x2="58.547cm" svg:y2="65.838cm">
          <text:p text:style-name="P5"><text:span text:style-name="T9">2255AM</text:span></text:p>
          <text:p text:style-name="P5"><text:span text:style-name="T9"/></text:p>
        </draw:line>
        <draw:line draw:style-name="gr10" draw:text-style-name="P10" draw:layer="layout" svg:x1="58.115cm" svg:y1="64.03cm" svg:x2="58.115cm" svg:y2="65.838cm">
          <text:p text:style-name="P5"><text:span text:style-name="T2">2238AM</text:span></text:p>
          <text:p text:style-name="P5"><text:span text:style-name="T10">Gen 47:28</text:span></text:p>
        </draw:line>
        <draw:custom-shape draw:style-name="gr52" draw:text-style-name="P3" draw:layer="layout" svg:width="2.944cm" svg:height="1.725cm" svg:x="58.948cm" svg:y="67.843cm">
          <text:p text:style-name="P2"><text:span text:style-name="T2">There is no record of Esau’s lifespan after the burial of Isaac (</text:span><text:span text:style-name="T4">Gen 35:29</text:span><text:span text:style-name="T2">)</text:span></text:p>
          <draw:enhanced-geometry svg:viewBox="0 0 21600 21600" draw:text-areas="800 800 20800 20800" draw:type="round-rectangular-callout" draw:modifiers="-7950.56027164686 21274.623406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 draw:text-style-name="P1" draw:layer="layout" svg:x1="58.547cm" svg:y1="67.426cm" svg:x2="58.547cm" svg:y2="68.696cm">
          <text:p/>
        </draw:line>
        <draw:line draw:style-name="gr6" draw:text-style-name="P1" draw:layer="layout" svg:x1="57.861cm" svg:y1="68.696cm" svg:x2="58.547cm" svg:y2="68.696cm">
          <text:p text:style-name="P5">27</text:p>
          <text:p text:style-name="P5"/>
        </draw:line>
        <draw:line draw:style-name="gr50" draw:text-style-name="P15" draw:layer="layout" svg:x1="54.813cm" svg:y1="70.284cm" svg:x2="54.813cm" svg:y2="72.214cm">
          <text:p text:style-name="P5"><text:span text:style-name="T9">2108AM</text:span></text:p>
          <text:p text:style-name="P5"><text:span text:style-name="T9"/></text:p>
        </draw:line>
        <draw:line draw:style-name="gr6" draw:text-style-name="P1" draw:layer="layout" svg:x1="58.115cm" svg:y1="64.03cm" svg:x2="58.547cm" svg:y2="64.03cm">
          <text:p text:style-name="P5"><text:span text:style-name="T6">17</text:span></text:p>
          <text:p text:style-name="P5"/>
        </draw:line>
        <draw:line draw:style-name="gr13" draw:text-style-name="P1" draw:layer="layout" svg:x1="56.413cm" svg:y1="61.681cm" svg:x2="56.413cm" svg:y2="63.488cm">
          <text:p/>
        </draw:line>
        <draw:line draw:style-name="gr6" draw:text-style-name="P1" draw:layer="layout" svg:x1="56.414cm" svg:y1="63.488cm" svg:x2="56.414cm" svg:y2="65.076cm">
          <text:p text:style-name="P5">123</text:p>
          <text:p text:style-name="P5"/>
        </draw:line>
        <draw:line draw:style-name="gr53" draw:text-style-name="P15" draw:layer="layout" svg:x1="56.414cm" svg:y1="65.076cm" svg:x2="56.414cm" svg:y2="65.838cm">
          <text:p text:style-name="P5"><text:span text:style-name="T9">63</text:span></text:p>
          <text:p text:style-name="P5"><text:span text:style-name="T9"/></text:p>
        </draw:line>
        <draw:line draw:style-name="gr6" draw:text-style-name="P1" draw:layer="layout" svg:x1="58.115cm" svg:y1="65.838cm" svg:x2="58.115cm" svg:y2="67.426cm">
          <text:p text:style-name="P5">130</text:p>
          <text:p text:style-name="P5"/>
        </draw:line>
        <draw:line draw:style-name="gr8" draw:text-style-name="P1" draw:layer="layout" svg:x1="58.115cm" svg:y1="73.46cm" svg:x2="69.037cm" svg:y2="73.459cm">
          <text:p text:style-name="P5"/>
          <text:p text:style-name="P5">430</text:p>
        </draw:line>
        <draw:line draw:style-name="gr54" draw:text-style-name="P23" draw:layer="layout" svg:x1="69.037cm" svg:y1="71.123cm" svg:x2="69.037cm" svg:y2="73.46cm">
          <text:p text:style-name="P8">2668.04AM</text:p>
          <text:p text:style-name="P5">Exodus</text:p>
        </draw:line>
        <draw:line draw:style-name="gr55" draw:text-style-name="P1" draw:layer="layout" svg:x1="69.037cm" svg:y1="73.459cm" svg:x2="70.104cm" svg:y2="73.459cm">
          <text:p text:style-name="P5"/>
          <text:p text:style-name="P5">41</text:p>
        </draw:line>
        <draw:custom-shape draw:style-name="gr56" draw:text-style-name="P3" draw:layer="layout" svg:width="4.956cm" svg:height="2.695cm" svg:x="63.58cm" svg:y="67.472cm">
          <text:p text:style-name="P2"><text:span text:style-name="T7">From the day they exited Egypt (1</text:span><text:span text:style-name="T16">st</text:span><text:span text:style-name="T7"> year, 1</text:span><text:span text:style-name="T16">st</text:span><text:span text:style-name="T7"> month, 15</text:span><text:span text:style-name="T16">th</text:span><text:span text:style-name="T7"> day) to the day they crossed the Jordan (</text:span><text:span text:style-name="T2">43</text:span><text:span text:style-name="T3">rd</text:span><text:span text:style-name="T2"> year, 1</text:span><text:span text:style-name="T3">st</text:span><text:span text:style-name="T2"> month, 10</text:span><text:span text:style-name="T3">th</text:span><text:span text:style-name="T2"> day) was exactly 15,115 days or</text:span></text:p>
          <text:p text:style-name="P2"><text:span text:style-name="T2">41 years, 11 months, 25 days</text:span></text:p>
          <text:p text:style-name="P2"><text:span text:style-name="T2">(</text:span><text:span text:style-name="T4">Num 33:3</text:span><text:span text:style-name="T2">→</text:span><text:span text:style-name="T4">Jos 4:19</text:span><text:span text:style-name="T2">)</text:span></text:p>
          <draw:enhanced-geometry svg:viewBox="0 0 21600 21600" draw:text-areas="800 800 20800 20800" draw:type="round-rectangular-callout" draw:modifiers="23765.6647165624 29299.4065281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6" draw:text-style-name="P1" draw:layer="layout" svg:x1="69.037cm" svg:y1="74.683cm" svg:x2="81.229cm" svg:y2="74.683cm">
          <text:p text:style-name="P5">1Ki 6:1</text:p>
          <text:p text:style-name="P5">480</text:p>
        </draw:line>
        <draw:line draw:style-name="gr57" draw:text-style-name="P1" draw:layer="layout" svg:x1="81.229cm" svg:y1="69.095cm" svg:x2="81.229cm" svg:y2="74.683cm">
          <text:p text:style-name="P5">3149AM</text:p>
          <text:p text:style-name="P5">Temple construction begins</text:p>
        </draw:line>
        <draw:line draw:style-name="gr8" draw:text-style-name="P10" draw:layer="layout" svg:x1="81.229cm" svg:y1="74.683cm" svg:x2="81.407cm" svg:y2="74.683cm">
          <text:p text:style-name="P5"><text:span text:style-name="T2"/></text:p>
          <text:p text:style-name="P5"><text:span text:style-name="T2">7</text:span></text:p>
        </draw:line>
        <draw:line draw:style-name="gr54" draw:text-style-name="P1" draw:layer="layout" svg:x1="81.407cm" svg:y1="74.683cm" svg:x2="81.407cm" svg:y2="80.423cm">
          <text:p text:style-name="P5">3156AM</text:p>
          <text:p text:style-name="P5">Temple construction ends</text:p>
        </draw:line>
        <draw:line draw:style-name="gr6" draw:text-style-name="P4" draw:layer="layout" svg:x1="81.407cm" svg:y1="74.683cm" svg:x2="81.737cm" svg:y2="74.683cm">
          <text:p text:style-name="P5"><text:span text:style-name="T2">13</text:span></text:p>
          <text:p text:style-name="P5"><text:span text:style-name="T6"/></text:p>
        </draw:line>
        <draw:line draw:style-name="gr54" draw:text-style-name="P4" draw:layer="layout" svg:x1="81.737cm" svg:y1="71.076cm" svg:x2="81.737cm" svg:y2="74.683cm">
          <text:p text:style-name="P5"><text:span text:style-name="T6">3169AM King’s house</text:span></text:p>
          <text:p text:style-name="P5"><text:span text:style-name="T6"/></text:p>
        </draw:line>
        <draw:custom-shape draw:style-name="gr58" draw:text-style-name="P25" draw:layer="layout" svg:width="13.301cm" svg:height="8.766cm" svg:x="81.914cm" svg:y="58.762cm">
          <text:p text:style-name="P24"><text:span text:style-name="T17">Extra-Biblical sources and assumptions are needed to go any further (eg. </text:span><text:span text:style-name="T18">Ezekiel 4:5</text:span><text:span text:style-name="T17">) simply because the Bible does not tell us precisely when several kings began to reign relative to each other, starting with both Jeroboam and Rehoboam relative to Solomon (we would have to </text:span><text:span text:style-name="T18">assume</text:span><text:span text:style-name="T17"> that they both began to reign the same year that Solomon died which </text:span><text:span text:style-name="T19">seems</text:span><text:span text:style-name="T17"> logical but the fact remains </text:span><text:span text:style-name="T18">the Bible does not tell us that</text:span><text:span text:style-name="T17">).</text:span></text:p>
          <text:p text:style-name="P24"><text:span text:style-name="T17"/></text:p>
          <text:p text:style-name="P24"><text:span text:style-name="T18">2Ki 14:29</text:span><text:span text:style-name="T17"> might make us think that Zachariah began to reign the same year that Jeroboam II died. But, when we put all the data from the Bible together there is a 24 year gap between the end of Jeroboam II’s reign and the beginning of Zachariah’s reign.</text:span></text:p>
          <text:p text:style-name="P24"><text:span text:style-name="T17"/></text:p>
          <text:p text:style-name="P24"><text:span text:style-name="T17">King Hezekiah’s reign began 8 years before the end of his father king Ahaz’s reign but the text might make us think otherwise (</text:span><text:span text:style-name="T18">2Ki 16:20</text:span><text:span text:style-name="T17">).</text:span></text:p>
          <text:p text:style-name="P24"><text:span text:style-name="T17"/></text:p>
          <text:p text:style-name="P24"><text:span text:style-name="T17">A more complex example is king Omri. He was made king (</text:span><text:span text:style-name="T18">1Ki 16:16</text:span><text:span text:style-name="T17">) but his reign did not begin until 4 years later (</text:span><text:span text:style-name="T18">1Ki 16:23</text:span><text:span text:style-name="T17">) which was 3 years after the end of Elah’s reign.</text:span></text:p>
          <text:p text:style-name="P24"><text:span text:style-name="T17"/></text:p>
          <text:p text:style-name="P24"><text:span text:style-name="T17">All of these examples serve to show us that making assumptions based on what we think the text says is a very easy way to stray from the path we are given.</text:span></text:p>
          <text:p text:style-name="P24"><text:span text:style-name="T17"/></text:p>
          <text:p text:style-name="P24"><text:span text:style-name="T17">See the chart “Kings of Judah &amp; Israel timeline” for more details and all the references for the examples given.</text:span></text:p>
          <draw:enhanced-geometry svg:viewBox="0 0 21600 21600" draw:text-areas="800 800 20800 20800" draw:type="round-rectangular-callout" draw:modifiers="-254.939106901218 30287.30466522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9" draw:text-style-name="P7" draw:layer="layout" svg:width="2.794cm" svg:height="1.588cm" svg:x="57.125cm" svg:y="75.249cm">
          <text:p text:style-name="P6"><text:span text:style-name="T5"><text:s text:c="8"/>Joseph</text:span></text:p>
          <text:p text:style-name="P6"><text:span text:style-name="T5"><text:s text:c="8"/>110</text:span></text:p>
          <draw:enhanced-geometry svg:viewBox="0 0 21600 21600" draw:type="rectangle" draw:enhanced-path="M 0 0 L 21600 0 21600 21600 0 21600 0 0 Z N"/>
        </draw:custom-shape>
        <draw:line draw:style-name="gr6" draw:text-style-name="P1" draw:layer="layout" svg:x1="58.115cm" svg:y1="76.837cm" svg:x2="58.115cm" svg:y2="75.249cm">
          <text:p text:style-name="P5">39</text:p>
          <text:p text:style-name="P5"/>
        </draw:line>
        <draw:line draw:style-name="gr60" draw:text-style-name="P26" draw:layer="layout" svg:x1="58.064cm" svg:y1="74.857cm" svg:x2="58.115cm" svg:y2="74.857cm">
          <text:p text:style-name="P5"><text:span text:style-name="T20"/></text:p>
          <text:p text:style-name="P5"><text:span text:style-name="T20">2</text:span></text:p>
        </draw:line>
        <draw:line draw:style-name="gr61" draw:text-style-name="P27" draw:layer="layout" svg:x1="57.886cm" svg:y1="74.857cm" svg:x2="58.064cm" svg:y2="74.857cm">
          <text:p text:style-name="P5"><text:span text:style-name="T20"/></text:p>
          <text:p text:style-name="P5"><text:span text:style-name="T20">7</text:span></text:p>
        </draw:line>
        <draw:line draw:style-name="gr6" draw:text-style-name="P28" draw:layer="layout" svg:x1="57.124cm" svg:y1="74.857cm" svg:x2="57.886cm" svg:y2="74.857cm">
          <text:p text:style-name="P5"><text:span text:style-name="T21"/></text:p>
          <text:p text:style-name="P5"><text:span text:style-name="T21">30</text:span></text:p>
        </draw:line>
        <draw:custom-shape draw:style-name="gr62" draw:text-style-name="P3" draw:layer="layout" svg:width="4.772cm" svg:height="2.481cm" svg:x="51.912cm" svg:y="75.121cm">
          <text:p text:style-name="P2"><text:span text:style-name="T2">30 when he stood before Pharaoh (</text:span><text:span text:style-name="T4">Gen 41:46</text:span><text:span text:style-name="T2">)</text:span></text:p>
          <text:p text:style-name="P2"><text:span text:style-name="T2"/></text:p>
          <text:p text:style-name="P2"><text:span text:style-name="T2">7 years of plenty (</text:span><text:span text:style-name="T4">Gen 41:47-53</text:span><text:span text:style-name="T2">)</text:span></text:p>
          <text:p text:style-name="P2"><text:span text:style-name="T2"/></text:p>
          <text:p text:style-name="P2"><text:span text:style-name="T2">2 years of famine (</text:span><text:span text:style-name="T4">Gen 45:6</text:span><text:span text:style-name="T2">)</text:span></text:p>
          <draw:enhanced-geometry svg:viewBox="0 0 21600 21600" draw:text-areas="800 800 20800 20800" draw:type="round-rectangular-callout" draw:modifiers="23604.7768698932 -2184.367445608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0" draw:text-style-name="P15" draw:layer="layout" svg:x1="57.125cm" svg:y1="76.837cm" svg:x2="57.125cm" svg:y2="78.767cm">
          <text:p text:style-name="P5"><text:span text:style-name="T9">2199AM</text:span></text:p>
          <text:p text:style-name="P5"><text:span text:style-name="T9"/></text:p>
        </draw:line>
        <draw:line draw:style-name="gr63" draw:text-style-name="P1" draw:layer="layout" svg:x1="57.125cm" svg:y1="67.426cm" svg:x2="57.125cm" svg:y2="75.249cm">
          <text:p/>
        </draw:line>
        <draw:custom-shape draw:style-name="gr64" draw:text-style-name="P7" draw:layer="layout" svg:width="3.048cm" svg:height="1.588cm" svg:x="54.813cm" svg:y="68.696cm">
          <text:p text:style-name="P6"><text:span text:style-name="T5">Esau</text:span></text:p>
          <text:p text:style-name="P6"><text:span text:style-name="T5">120+</text:span></text:p>
          <draw:enhanced-geometry svg:viewBox="0 0 21600 21600" draw:type="rectangle" draw:enhanced-path="M 0 0 L 21600 0 21600 21600 0 21600 0 0 Z N"/>
        </draw:custom-shape>
        <draw:line draw:style-name="gr65" draw:text-style-name="P19" draw:layer="layout" svg:x1="57.125cm" svg:y1="65.838cm" svg:x2="57.125cm" svg:y2="67.426cm">
          <text:p text:style-name="P8"><text:span text:style-name="T11">91</text:span></text:p>
          <text:p text:style-name="P8"><text:span text:style-name="T11"/></text:p>
        </draw:line>
        <draw:line draw:style-name="gr50" draw:text-style-name="P15" draw:layer="layout" svg:x1="59.919cm" svg:y1="76.837cm" svg:x2="59.919cm" svg:y2="78.767cm">
          <text:p text:style-name="P5"><text:span text:style-name="T9">2309AM</text:span></text:p>
          <text:p text:style-name="P5"><text:span text:style-name="T9"/></text:p>
        </draw:line>
        <draw:line draw:style-name="gr5" draw:text-style-name="P1" draw:layer="layout" svg:x1="57.886cm" svg:y1="74.614cm" svg:x2="57.886cm" svg:y2="75.249cm">
          <text:p/>
        </draw:line>
        <draw:line draw:style-name="gr5" draw:text-style-name="P1" draw:layer="layout" svg:x1="58.063cm" svg:y1="74.614cm" svg:x2="58.063cm" svg:y2="75.249cm">
          <text:p/>
        </draw:line>
        <draw:line draw:style-name="gr6" draw:text-style-name="P1" draw:layer="layout" svg:x1="43.335cm" svg:y1="36.159cm" svg:x2="44.272cm" svg:y2="36.159cm">
          <text:p text:style-name="P5"/>
          <text:p text:style-name="P5">37</text:p>
        </draw:line>
        <draw:line draw:style-name="gr6" draw:text-style-name="P1" draw:layer="layout" svg:x1="43.335cm" svg:y1="40.855cm" svg:x2="45.898cm" svg:y2="40.855cm">
          <text:p text:style-name="P5"/>
          <text:p text:style-name="P5">101 <text:s text:c="15"/></text:p>
        </draw:line>
        <draw:line draw:style-name="gr6" draw:text-style-name="P1" draw:layer="layout" svg:x1="43.335cm" svg:y1="52.625cm" svg:x2="50.749cm" svg:y2="52.626cm">
          <text:p text:style-name="P5"/>
          <text:p text:style-name="P5">292 <text:s text:c="63"/></text:p>
        </draw:line>
        <draw:line draw:style-name="gr6" draw:text-style-name="P1" draw:layer="layout" svg:x1="43.332cm" svg:y1="57.109cm" svg:x2="50.495cm" svg:y2="57.109cm">
          <text:p text:style-name="P5"/>
          <text:p text:style-name="P5">282 <text:s text:c="61"/></text:p>
        </draw:line>
        <draw:line draw:style-name="gr6" draw:text-style-name="P1" draw:layer="layout" svg:x1="43.332cm" svg:y1="65.067cm" svg:x2="53.289cm" svg:y2="65.066cm">
          <text:p text:style-name="P5"/>
          <text:p text:style-name="P5">392 <text:s text:c="88"/></text:p>
        </draw:line>
        <draw:line draw:style-name="gr6" draw:text-style-name="P1" draw:layer="layout" svg:x1="43.332cm" svg:y1="67.433cm" svg:x2="54.813cm" svg:y2="67.433cm">
          <text:p text:style-name="P5"/>
          <text:p text:style-name="P5">452 <text:s text:c="104"/></text:p>
        </draw:line>
        <draw:line draw:style-name="gr6" draw:text-style-name="P1" draw:layer="layout" svg:x1="43.335cm" svg:y1="70.284cm" svg:x2="54.816cm" svg:y2="70.284cm">
          <text:p text:style-name="P5"/>
          <text:p text:style-name="P5">452 <text:s text:c="104"/></text:p>
        </draw:line>
        <draw:custom-shape draw:style-name="gr66" draw:text-style-name="P29" draw:layer="layout" svg:width="0.538cm" svg:height="0.505cm" svg:x="42.007cm" svg:y="33.47cm">
          <text:p text:style-name="P5">2</text:p>
          <draw:enhanced-geometry svg:viewBox="0 0 21600 21600" draw:text-areas="800 800 20800 20800" draw:type="round-rectangular-callout" draw:modifiers="50493.5064935065 11781.81818181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67" draw:text-style-name="P5" draw:layer="layout" svg:x1="43.294cm" svg:y1="33.758cm" svg:x2="43.345cm" svg:y2="33.758cm">
          <text:p/>
        </draw:line>
        <draw:custom-shape draw:style-name="gr68" draw:text-style-name="P31" draw:layer="layout" svg:width="3.048cm" svg:height="1.588cm" svg:x="67.005cm" svg:y="75.967cm">
          <text:p text:style-name="P30"><text:span text:style-name="T22">Moses</text:span></text:p>
          <text:p text:style-name="P30"><text:span text:style-name="T22">120</text:span></text:p>
          <draw:enhanced-geometry svg:viewBox="0 0 21600 21600" draw:type="rectangle" draw:enhanced-path="M 0 0 L 21600 0 21600 21600 0 21600 0 0 Z N"/>
        </draw:custom-shape>
        <draw:line draw:style-name="gr57" draw:text-style-name="P1" draw:layer="layout" svg:x1="67.005cm" svg:y1="73.46cm" svg:x2="67.005cm" svg:y2="75.967cm">
          <text:p text:style-name="P5">2588AM</text:p>
          <text:p text:style-name="P5"/>
        </draw:line>
        <draw:line draw:style-name="gr57" draw:text-style-name="P1" draw:layer="layout" svg:x1="67.005cm" svg:y1="72.441cm" svg:x2="67.005cm" svg:y2="73.457cm">
          <text:p text:style-name="P5">350</text:p>
          <text:p text:style-name="P5"/>
        </draw:line>
        <draw:custom-shape draw:style-name="gr69" draw:text-style-name="P3" draw:layer="layout" svg:width="5.572cm" svg:height="1.046cm" svg:x="71.016cm" svg:y="73.178cm">
          <text:p text:style-name="P2"><text:span text:style-name="T4">Deu 1:3</text:span><text:span text:style-name="T23"> (40</text:span><text:span text:style-name="T24">th</text:span><text:span text:style-name="T23"> year, 11</text:span><text:span text:style-name="T24">th</text:span><text:span text:style-name="T23"> month, 1</text:span><text:span text:style-name="T24">st</text:span><text:span text:style-name="T23"> day)</text:span></text:p>
          <text:p text:style-name="P2"><text:span text:style-name="T2">789 days (2 years, 2 months, 9 days)</text:span></text:p>
          <text:p text:style-name="P2"><text:span text:style-name="T25">Jos 4:19</text:span><text:span text:style-name="T7"> (43</text:span><text:span text:style-name="T16">rd</text:span><text:span text:style-name="T7"> year, </text:span><text:span text:style-name="T23">1</text:span><text:span text:style-name="T24">st</text:span><text:span text:style-name="T23"> month, 10</text:span><text:span text:style-name="T24">th</text:span><text:span text:style-name="T23"> day)</text:span></text:p>
          <draw:enhanced-geometry svg:viewBox="0 0 21600 21600" draw:text-areas="800 800 20800 20800" draw:type="round-rectangular-callout" draw:modifiers="-3639.40427059035 12089.39828080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0" draw:text-style-name="P15" draw:layer="layout" svg:x1="70.053cm" svg:y1="77.555cm" svg:x2="70.053cm" svg:y2="79.689cm">
          <text:p text:style-name="P5"><text:span text:style-name="T9">2708AM</text:span><text:span text:style-name="T26">*</text:span></text:p>
          <text:p text:style-name="P5"><text:span text:style-name="T9"/></text:p>
        </draw:line>
        <draw:line draw:style-name="gr50" draw:text-style-name="P4" draw:layer="layout" svg:x1="68.021cm" svg:y1="77.555cm" svg:x2="68.021cm" svg:y2="79.79cm">
          <text:p text:style-name="P5"><text:span text:style-name="T6">2628AM</text:span></text:p>
          <text:p text:style-name="P5"><text:span text:style-name="T6">Exo 2:11-15</text:span></text:p>
          <text:p text:style-name="P5"><text:span text:style-name="T6">Acts 7:23</text:span></text:p>
        </draw:line>
        <draw:line draw:style-name="gr50" draw:text-style-name="P4" draw:layer="layout" svg:x1="69.036cm" svg:y1="77.555cm" svg:x2="69.036cm" svg:y2="79.485cm">
          <text:p text:style-name="P5"><text:span text:style-name="T6">2668AM</text:span></text:p>
          <text:p text:style-name="P5"><text:span text:style-name="T6">Acts 7:30</text:span></text:p>
        </draw:line>
        <draw:line draw:style-name="gr57" draw:text-style-name="P1" draw:layer="layout" svg:x1="68.02cm" svg:y1="73.461cm" svg:x2="68.02cm" svg:y2="75.968cm">
          <text:p text:style-name="P5">2628AM</text:p>
          <text:p text:style-name="P5"/>
        </draw:line>
        <draw:line draw:style-name="gr57" draw:text-style-name="P1" draw:layer="layout" svg:x1="68.02cm" svg:y1="72.439cm" svg:x2="68.02cm" svg:y2="73.455cm">
          <text:p text:style-name="P5">390</text:p>
          <text:p text:style-name="P5"/>
        </draw:line>
        <draw:line draw:style-name="gr6" draw:text-style-name="P1" draw:layer="layout" svg:x1="69.038cm" svg:y1="75.967cm" svg:x2="69.038cm" svg:y2="77.555cm">
          <text:p text:style-name="P5">80</text:p>
          <text:p text:style-name="P5"/>
        </draw:line>
        <draw:line draw:style-name="gr6" draw:text-style-name="P1" draw:layer="layout" svg:x1="68.02cm" svg:y1="77.554cm" svg:x2="68.02cm" svg:y2="75.967cm">
          <text:p text:style-name="P5">40</text:p>
          <text:p text:style-name="P5"/>
        </draw:line>
        <draw:line draw:style-name="gr5" draw:text-style-name="P1" draw:layer="layout" svg:x1="69.036cm" svg:y1="75.047cm" svg:x2="69.036cm" svg:y2="75.967cm">
          <text:p/>
        </draw:line>
        <draw:custom-shape draw:style-name="gr70" draw:text-style-name="P25" draw:layer="layout" svg:width="4.304cm" svg:height="2.399cm" svg:x="59.372cm" svg:y="69.991cm">
          <text:p text:style-name="P24"><text:span text:style-name="T17">The exodus occurred on the 1</text:span><text:span text:style-name="T27">st</text:span><text:span text:style-name="T17"> month, 15</text:span><text:span text:style-name="T27">th</text:span><text:span text:style-name="T17"> day, 2668AM.</text:span></text:p>
          <text:p text:style-name="P24"><text:span text:style-name="T17">(</text:span><text:span text:style-name="T18">Num 33:3</text:span><text:span text:style-name="T17">)</text:span></text:p>
          <text:p text:style-name="P24"><text:span text:style-name="T17">Therefore, the sojourning in Egypt began on the</text:span></text:p>
          <text:p text:style-name="P24"><text:span text:style-name="T17">1</text:span><text:span text:style-name="T27">st</text:span><text:span text:style-name="T17"> month, 15</text:span><text:span text:style-name="T27">th</text:span><text:span text:style-name="T17"> day, 2238AM.</text:span></text:p>
          <text:p text:style-name="P24"><text:span text:style-name="T17">(</text:span><text:span text:style-name="T18">Exo 12:40,41</text:span><text:span text:style-name="T17">)</text:span></text:p>
          <draw:enhanced-geometry svg:viewBox="0 0 21600 21600" draw:text-areas="800 800 20800 20800" draw:type="round-rectangular-callout" draw:modifiers="-6226.62020905923 311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71" draw:text-style-name="P25" draw:layer="layout" svg:width="4.154cm" svg:height="0.886cm" svg:x="70.738cm" svg:y="68.946cm">
          <text:p text:style-name="P24"><text:span text:style-name="T18">Deu 1:3</text:span></text:p>
          <text:p text:style-name="P24"><text:span text:style-name="T17">40</text:span><text:span text:style-name="T27">th</text:span><text:span text:style-name="T17"> year, 11</text:span><text:span text:style-name="T27">th</text:span><text:span text:style-name="T17"> month, 1</text:span><text:span text:style-name="T27">st</text:span><text:span text:style-name="T17"> day</text:span></text:p>
          <draw:enhanced-geometry svg:viewBox="0 0 21600 21600" draw:text-areas="800 800 20800 20800" draw:type="round-rectangular-callout" draw:modifiers="-3555.81227436823 32582.63810597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72" draw:text-style-name="P25" draw:layer="layout" svg:width="5.303cm" svg:height="1.932cm" svg:x="71.532cm" svg:y="75.591cm">
          <text:p text:style-name="P24"><text:span text:style-name="T28">*</text:span><text:span text:style-name="T17">Moses is still alive in the 41</text:span><text:span text:style-name="T27">st</text:span><text:span text:style-name="T17"> year (he speaks of 40 years that have already past) and he died that same year before his 121</text:span><text:span text:style-name="T27">st</text:span><text:span text:style-name="T17"> birthday</text:span></text:p>
          <text:p text:style-name="P24"><text:span text:style-name="T18">Deu 2:7</text:span><text:span text:style-name="T17">, </text:span><text:span text:style-name="T18">8:2</text:span><text:span text:style-name="T29">,</text:span><text:span text:style-name="T18">4</text:span><text:span text:style-name="T17">, </text:span><text:span text:style-name="T18">29:5</text:span></text:p>
          <draw:enhanced-geometry svg:viewBox="0 0 21600 21600" draw:text-areas="800 800 20800 20800" draw:type="round-rectangular-callout" draw:modifiers="-6014.93212669683 -2905.32850491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73" draw:text-style-name="P25" draw:layer="layout" svg:width="6.119cm" svg:height="5.08cm" svg:x="68.536cm" svg:y="58.76cm">
          <text:p text:style-name="P24"><text:span text:style-name="T17">The 12 spies are sent from Kadesh-Barnea in the 2</text:span><text:span text:style-name="T27">nd</text:span><text:span text:style-name="T17"> year after the exodus.</text:span></text:p>
          <text:p text:style-name="P24"><text:span text:style-name="T17"/></text:p>
          <text:p text:style-name="P24"><text:span text:style-name="T17">The 40 year wandering judgment is decreed in the 2</text:span><text:span text:style-name="T27">nd</text:span><text:span text:style-name="T17"> year after the exodus (</text:span><text:span text:style-name="T18">Num 14</text:span><text:span text:style-name="T17">; ~4</text:span><text:span text:style-name="T27">th</text:span><text:span text:style-name="T17"> month, 26</text:span><text:span text:style-name="T27">th</text:span><text:span text:style-name="T17"> day; ~476 days after the day of the exodus)</text:span></text:p>
          <text:p text:style-name="P24"><text:span text:style-name="T17"/></text:p>
          <text:p text:style-name="P24"><text:span text:style-name="T17">Refer to the article “How long after the exodus did the Israelites enter Canaan?” for more details.</text:span></text:p>
          <draw:enhanced-geometry svg:viewBox="0 0 21600 21600" draw:text-areas="800 800 20800 20800" draw:type="round-rectangular-callout" draw:modifiers="1863.52941176471 28040.4644754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74" draw:text-style-name="P10" draw:layer="layout" svg:x1="68.021cm" svg:y1="79.79cm" svg:x2="69.036cm" svg:y2="79.79cm">
          <text:p text:style-name="P5"><text:span text:style-name="T2"/></text:p>
          <text:p text:style-name="P5"><text:span text:style-name="T2">Midian</text:span></text:p>
        </draw:line>
        <draw:line draw:style-name="gr5" draw:text-style-name="P1" draw:layer="layout" svg:x1="69.036cm" svg:y1="79.485cm" svg:x2="69.036cm" svg:y2="79.79cm">
          <text:p/>
        </draw:line>
        <draw:line draw:style-name="gr57" draw:text-style-name="P23" draw:layer="layout" svg:x1="70.104cm" svg:y1="70.767cm" svg:x2="70.104cm" svg:y2="73.459cm">
          <text:p text:style-name="P8">2710.027AM</text:p>
          <text:p text:style-name="P5">Jordan</text:p>
        </draw:line>
        <draw:custom-shape draw:style-name="gr75" draw:text-style-name="P31" draw:layer="layout" svg:width="3.124cm" svg:height="1.588cm" svg:x="66.928cm" svg:y="80.385cm">
          <text:p text:style-name="P30"><text:span text:style-name="T22">Aaron</text:span></text:p>
          <text:p text:style-name="P30"><text:span text:style-name="T22">123</text:span></text:p>
          <draw:enhanced-geometry svg:viewBox="0 0 21600 21600" draw:type="rectangle" draw:enhanced-path="M 0 0 L 21600 0 21600 21600 0 21600 0 0 Z N"/>
        </draw:custom-shape>
        <draw:custom-shape draw:style-name="gr76" draw:text-style-name="P25" draw:layer="layout" svg:width="7.25cm" svg:height="1.678cm" svg:x="71.437cm" svg:y="79.69cm">
          <text:p text:style-name="P24"><text:span text:style-name="T17">Moses was 80 when he was told to return to Egypt and when he stood before Pharaoh (</text:span><text:span text:style-name="T18">Exo 7:7</text:span><text:span text:style-name="T17">, </text:span><text:span text:style-name="T18">Acts 7:30</text:span><text:span text:style-name="T29">). </text:span><text:span text:style-name="T17">In order for Moses to lead them for 40 years the exodus had to occur the same year.</text:span></text:p>
          <draw:enhanced-geometry svg:viewBox="0 0 21600 21600" draw:text-areas="800 800 20800 20800" draw:type="round-rectangular-callout" draw:modifiers="-7113.61191559785 4850.029779630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5" draw:text-style-name="P1" draw:layer="layout" svg:x1="69.036cm" svg:y1="79.79cm" svg:x2="69.036cm" svg:y2="80.385cm">
          <text:p/>
        </draw:line>
        <draw:line draw:style-name="gr77" draw:text-style-name="P1" draw:layer="layout" svg:x1="66.928cm" svg:y1="80.384cm" svg:x2="66.928cm" svg:y2="78.403cm">
          <text:p text:style-name="P5">2585AM</text:p>
          <text:p text:style-name="P5"/>
        </draw:line>
        <draw:line draw:style-name="gr6" draw:text-style-name="P1" draw:layer="layout" svg:x1="69.036cm" svg:y1="80.385cm" svg:x2="69.036cm" svg:y2="81.973cm">
          <text:p text:style-name="P5">83</text:p>
          <text:p text:style-name="P5"/>
        </draw:line>
        <draw:line draw:style-name="gr50" draw:text-style-name="P15" draw:layer="layout" svg:x1="70.052cm" svg:y1="81.973cm" svg:x2="70.052cm" svg:y2="83.802cm">
          <text:p text:style-name="P5"><text:span text:style-name="T9">2708AM</text:span></text:p>
          <text:p text:style-name="P5"><text:span text:style-name="T9"/></text:p>
        </draw:line>
        <draw:custom-shape draw:style-name="gr78" draw:text-style-name="P31" draw:layer="layout" svg:width="2.159cm" svg:height="1.588cm" svg:x="68.047cm" svg:y="65.675cm">
          <text:p text:style-name="P30"><text:span text:style-name="T22"><text:s text:c="11"/>Caleb</text:span></text:p>
          <text:p text:style-name="P30"><text:span text:style-name="T22"><text:s text:c="11"/>85+</text:span></text:p>
          <draw:enhanced-geometry svg:viewBox="0 0 21600 21600" draw:type="rectangle" draw:enhanced-path="M 0 0 L 21600 0 21600 21600 0 21600 0 0 Z N"/>
        </draw:custom-shape>
        <draw:line draw:style-name="gr6" draw:text-style-name="P1" draw:layer="layout" svg:x1="69.063cm" svg:y1="67.263cm" svg:x2="69.063cm" svg:y2="65.675cm">
          <text:p text:style-name="P5">40</text:p>
          <text:p text:style-name="P5"/>
        </draw:line>
        <draw:line draw:style-name="gr79" draw:text-style-name="P1" draw:layer="layout" svg:x1="70.206cm" svg:y1="69.143cm" svg:x2="70.206cm" svg:y2="73.459cm">
          <text:p/>
        </draw:line>
        <draw:line draw:style-name="gr50" draw:text-style-name="P15" draw:layer="layout" svg:x1="70.206cm" svg:y1="67.263cm" svg:x2="70.206cm" svg:y2="69.143cm">
          <text:p text:style-name="P5"><text:span text:style-name="T9">2714AM</text:span></text:p>
          <text:p text:style-name="P5"><text:span text:style-name="T9"/></text:p>
        </draw:line>
        <draw:line draw:style-name="gr6" draw:text-style-name="P26" draw:layer="layout" svg:x1="70.104cm" svg:y1="73.459cm" svg:x2="70.206cm" svg:y2="73.459cm">
          <text:p text:style-name="P5"><text:span text:style-name="T20"/></text:p>
          <text:p text:style-name="P5"><text:span text:style-name="T20">4</text:span></text:p>
        </draw:line>
        <draw:custom-shape draw:style-name="gr80" draw:text-style-name="P34" draw:layer="layout" svg:width="8.277cm" svg:height="4.863cm" svg:x="85.302cm" svg:y="2.963cm">
          <text:p text:style-name="P32"><text:span text:style-name="T30">Design notes:</text:span></text:p>
          <text:p text:style-name="P32"><text:span text:style-name="T30"/></text:p>
          <text:list text:style-name="L1">
            <text:list-item>
              <text:p text:style-name="P33"><text:span text:style-name="T30">Created with Libreoffice Draw</text:span></text:p>
            </text:list-item>
            <text:list-item>
              <text:p text:style-name="P33"><text:span text:style-name="T30">(x-axis) 0.01” = 1 year</text:span></text:p>
            </text:list-item>
            <text:list-item>
              <text:p text:style-name="P32"><text:span text:style-name="T30">(y-axis) not drawn to scale</text:span></text:p>
            </text:list-item>
            <text:list-item>
              <text:p text:style-name="P33"><text:span text:style-name="T31">Limited to </text:span><text:span text:style-name="T30">1/100</text:span><text:span text:style-name="T32">th</text:span><text:span text:style-name="T33"> of an inch</text:span></text:p>
              <text:list>
                <text:list-item>
                  <text:p text:style-name="P33"><text:span text:style-name="T33">eg. 0.03975” → 0.04”</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81" draw:text-style-name="P19" draw:layer="layout" svg:x1="69.063cm" svg:y1="65.357cm" svg:x2="69.063cm" svg:y2="65.675cm">
          <text:p/>
        </draw:line>
        <draw:line draw:style-name="gr82" draw:text-style-name="P1" draw:layer="layout" svg:x1="59.919cm" svg:y1="73.459cm" svg:x2="59.919cm" svg:y2="75.249cm">
          <text:p/>
        </draw:line>
        <draw:line draw:style-name="gr57" draw:text-style-name="P1" draw:layer="layout" svg:x1="59.919cm" svg:y1="72.849cm" svg:x2="59.919cm" svg:y2="73.459cm">
          <text:p text:style-name="P5">71</text:p>
          <text:p text:style-name="P5"/>
        </draw:line>
        <draw:line draw:style-name="gr6" draw:text-style-name="P1" draw:layer="layout" svg:x1="55.194cm" svg:y1="53.416cm" svg:x2="56.083cm" svg:y2="53.416cm">
          <text:p text:style-name="P5"/>
          <text:p text:style-name="P5">35</text:p>
        </draw:line>
        <draw:line draw:style-name="gr6" draw:text-style-name="P1" draw:layer="layout" svg:x1="54.178cm" svg:y1="50.259cm" svg:x2="56.083cm" svg:y2="50.259cm">
          <text:p text:style-name="P5">75</text:p>
          <text:p text:style-name="P5"/>
        </draw:line>
        <draw:line draw:style-name="gr83" draw:text-style-name="P1" draw:layer="layout" svg:x1="51.994cm" svg:y1="48.154cm" svg:x2="56.083cm" svg:y2="48.154cm">
          <text:p text:style-name="P5"><text:s text:c="29"/>161</text:p>
          <text:p text:style-name="P5"/>
        </draw:line>
        <draw:line draw:style-name="gr6" draw:text-style-name="P1" draw:layer="layout" svg:x1="53.171cm" svg:y1="45.559cm" svg:x2="56.083cm" svg:y2="45.559cm">
          <text:p text:style-name="P5"/>
          <text:p text:style-name="P5">115</text:p>
        </draw:line>
        <draw:line draw:style-name="gr6" draw:text-style-name="P1" draw:layer="layout" svg:x1="52.731cm" svg:y1="43.209cm" svg:x2="56.083cm" svg:y2="43.209cm">
          <text:p text:style-name="P5">132</text:p>
          <text:p text:style-name="P5"/>
        </draw:line>
        <draw:line draw:style-name="gr83" draw:text-style-name="P1" draw:layer="layout" svg:x1="51.969cm" svg:y1="41.691cm" svg:x2="56.083cm" svg:y2="41.691cm">
          <text:p text:style-name="P5"><text:s text:c="29"/>162</text:p>
          <text:p text:style-name="P5"/>
        </draw:line>
        <draw:line draw:style-name="gr84" draw:text-style-name="P1" draw:layer="layout" svg:x1="56.82cm" svg:y1="40.862cm" svg:x2="56.82cm" svg:y2="63.488cm">
          <text:p/>
        </draw:line>
        <draw:line draw:style-name="gr85" draw:text-style-name="P1" draw:layer="layout" svg:x1="56.083cm" svg:y1="48.154cm" svg:x2="56.82cm" svg:y2="48.154cm">
          <text:p text:style-name="P5">29</text:p>
          <text:p text:style-name="P5"/>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adornments="Regular" style:font-family-generic="swiss" style:font-pitch="variable"/>
    <style:font-face style:name="Ubuntu1" svg:font-family="Ubuntu"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4" draw:display-name="Arrowheads 4" svg:viewBox="0 0 20 20" svg:d="M0 20l10-20 10 20z"/>
    <draw:marker draw:name="Arrowheads_20_5" draw:display-name="Arrowheads 5" svg:viewBox="0 0 20 13" svg:d="M0 13l10-13 10 13z"/>
    <draw:marker draw:name="Arrowheads_20_7" draw:display-name="Arrowheads 7" svg:viewBox="0 0 1131 754" svg:d="M566 0l-566 754 114-85 136-68 148-46 161-17 161 13 153 46 140 68 118 89z"/>
    <draw:marker draw:name="Arrowheads_20_8" draw:display-name="Arrowheads 8" svg:viewBox="0 0 1131 754" svg:d="M566 0l-566 754 114-85 136-68 148-46 161-17 161 13 153 46 140 68 118 89z"/>
    <draw:marker draw:name="Arrowheads_20_9" draw:display-name="Arrowheads 9" svg:viewBox="0 0 1131 754" svg:d="M566 0l-566 754 114-85 136-68 148-46 161-17 161 13 153 46 140 68 118 89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127cm" fo:padding-right="0.127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Ubuntu" fo:font-family="Ubuntu" style:font-style-name="Regular"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1.27cm" fo:margin-right="1.27cm" fo:page-width="96.52cm" fo:page-height="85.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0:38:15.574521000</meta:creation-date>
    <dc:date>2026-07-11T12:31:50.577096225</dc:date>
    <meta:editing-duration>PT17H59M3S</meta:editing-duration>
    <meta:editing-cycles>391</meta:editing-cycles>
    <meta:generator>LibreOffice/26.2.4.2$Linux_X86_64 LibreOffice_project/64a984c51f4702dbd3710b13428c673a2f1292e7</meta:generator>
    <dc:title>Calculations from Bible data</dc:title>
    <meta:document-statistic meta:object-count="242"/>
  </office:meta>
</office:document-meta>
</file>