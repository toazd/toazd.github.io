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Fonts/Font_Outfit_1.ttf" manifest:media-type="application/x-font-ttf"/>
  <manifest:file-entry manifest:full-path="Fonts/Font_Liberation_Serif_1.ttf" manifest:media-type="application/x-font-ttf"/>
  <manifest:file-entry manifest:full-path="Fonts/Font_Liberation_Serif_2.ttf" manifest:media-type="application/x-font-ttf"/>
  <manifest:file-entry manifest:full-path="Fonts/Font_Liberation_Serif_3.ttf" manifest:media-type="application/x-font-ttf"/>
  <manifest:file-entry manifest:full-path="Fonts/Font_Liberation_Serif_4.ttf" manifest:media-type="application/x-font-ttf"/>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Microsoft YaHei" svg:font-family="'Microsoft YaHei'" style:font-family-generic="system" style:font-pitch="variable"/>
    <style:font-face style:name="Noto Sans" svg:font-family="'Noto Sans'" style:font-family-generic="roman" style:font-pitch="variable"/>
    <style:font-face style:name="Outfit" svg:font-family="Outfit" style:font-pitch="variable">
      <svg:font-face-src>
        <svg:font-face-uri xlink:href="Fonts/Font_Outfit_1.ttf" xlink:type="simple" loext:font-style="normal" loext:font-weight="normal">
          <svg:font-face-format svg:string="truetype"/>
        </svg:font-face-uri>
        <svg:font-face-uri xlink:href="Fonts/Font_Outfit_1.ttf" xlink:type="simple" loext:font-style="normal" loext:font-weight="bold">
          <svg:font-face-format svg:string="truetype"/>
        </svg:font-face-uri>
      </svg:font-face-src>
    </style:font-fac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dash="Dash_20_Dot_20_4" svg:stroke-width="0.106cm" svg:stroke-color="#c9211e" draw:marker-start-width="0.359cm" draw:marker-end-width="0.359cm" draw:fill="none" draw:textarea-vertical-align="middle" fo:padding-top="0.178cm" fo:padding-bottom="0.178cm" fo:padding-left="0.303cm" fo:padding-right="0.303cm" loext:decorative="false"/>
    </style:style>
    <style:style style:name="gr2" style:family="graphic" style:parent-style-name="standard" style:list-style-name="L1">
      <style:graphic-properties draw:fill-color="#ffffff" draw:textarea-horizontal-align="justify" draw:textarea-vertical-align="middle" draw:auto-grow-height="false" fo:min-height="1.398cm" fo:min-width="3.441cm" fo:wrap-option="wrap" style:writing-mode="lr-tb" loext:decorative="false"/>
      <style:paragraph-properties style:writing-mode="lr-tb"/>
    </style:style>
    <style:style style:name="gr3" style:family="graphic" style:parent-style-name="standard" style:list-style-name="L1">
      <style:graphic-properties svg:stroke-width="0cm" svg:stroke-color="#3465a4" draw:marker-start-width="0.2cm" draw:marker-end-width="0.2cm" draw:fill-color="#b4c7dc" draw:textarea-horizontal-align="justify" draw:textarea-vertical-align="middle" draw:auto-grow-height="false" fo:min-height="0.896cm" fo:min-width="1.916cm" fo:padding-top="0.125cm" fo:padding-bottom="0.125cm" fo:padding-left="0.25cm" fo:padding-right="0.25cm" style:writing-mode="lr-tb" loext:decorative="false"/>
      <style:paragraph-properties style:writing-mode="lr-tb"/>
    </style:style>
    <style:style style:name="gr4" style:family="graphic" style:parent-style-name="standard" style:list-style-name="L1">
      <style:graphic-properties svg:stroke-width="0cm" svg:stroke-color="#3465a4" draw:marker-start-width="0.2cm" draw:marker-end-width="0.2cm" draw:fill-color="#b4c7dc" draw:textarea-horizontal-align="justify" draw:textarea-vertical-align="middle" draw:auto-grow-height="false" fo:min-height="0.896cm" fo:min-width="2.616cm" fo:padding-top="0.125cm" fo:padding-bottom="0.125cm" fo:padding-left="0.25cm" fo:padding-right="0.25cm" style:writing-mode="lr-tb" loext:decorative="false"/>
      <style:paragraph-properties style:writing-mode="lr-tb"/>
    </style:style>
    <style:style style:name="gr5" style:family="graphic" style:parent-style-name="standard" style:list-style-name="L1">
      <style:graphic-properties svg:stroke-width="0cm" svg:stroke-color="#3465a4" draw:marker-start-width="0.2cm" draw:marker-end-width="0.2cm" draw:fill-color="#f7d1d5" draw:textarea-horizontal-align="justify" draw:textarea-vertical-align="middle" draw:auto-grow-height="false" fo:min-height="0.896cm" fo:min-width="1.916cm" fo:padding-top="0.125cm" fo:padding-bottom="0.125cm" fo:padding-left="0.25cm" fo:padding-right="0.25cm" style:writing-mode="lr-tb" loext:decorative="false"/>
      <style:paragraph-properties style:writing-mode="lr-tb"/>
    </style:style>
    <style:style style:name="gr6" style:family="graphic" style:parent-style-name="objectwithoutfill">
      <style:graphic-properties svg:stroke-width="0.212cm" svg:stroke-color="#800080" draw:marker-start-width="0.518cm" draw:marker-end-width="0.518cm" draw:fill="none" draw:textarea-vertical-align="middle" fo:padding-top="0.231cm" fo:padding-bottom="0.231cm" fo:padding-left="0.356cm" fo:padding-right="0.356cm" loext:decorative="false"/>
    </style:style>
    <style:style style:name="gr7" style:family="graphic" style:parent-style-name="standard" style:list-style-name="L1">
      <style:graphic-properties svg:stroke-width="0cm" svg:stroke-color="#3465a4" draw:marker-start-width="0.2cm" draw:marker-end-width="0.2cm" draw:fill-color="#b4c7dc" draw:textarea-horizontal-align="justify" draw:textarea-vertical-align="middle" draw:auto-grow-height="false" fo:min-height="0.896cm" fo:min-width="1.916cm" fo:padding-top="0.125cm" fo:padding-bottom="0.125cm" fo:padding-left="0.25cm" fo:padding-right="0.25cm" style:writing-mode="lr-tb" loext:decorative="false"/>
      <style:paragraph-properties style:writing-mode="lr-tb"/>
    </style:style>
    <style:style style:name="gr8" style:family="graphic" style:parent-style-name="objectwithoutfill">
      <style:graphic-properties svg:stroke-width="0.106cm" svg:stroke-color="#c9211e" draw:marker-start-width="0.359cm" draw:marker-end-width="0.359cm" draw:fill="none" draw:textarea-vertical-align="middle" fo:padding-top="0.178cm" fo:padding-bottom="0.178cm" fo:padding-left="0.303cm" fo:padding-right="0.303cm" loext:decorative="false"/>
    </style:style>
    <style:style style:name="gr9" style:family="graphic" style:parent-style-name="objectwithoutfill">
      <style:graphic-properties svg:stroke-width="0.106cm" svg:stroke-color="#ffd428" draw:marker-start-width="0.358cm" draw:marker-end="Arrowheads_20_3" draw:marker-end-width="0.458cm" draw:fill="none" draw:textarea-vertical-align="middle" fo:padding-top="0.177cm" fo:padding-bottom="0.177cm" fo:padding-left="0.302cm" fo:padding-right="0.302cm" loext:decorative="false"/>
    </style:style>
    <style:style style:name="gr10" style:family="graphic" style:parent-style-name="objectwithoutfill">
      <style:graphic-properties draw:stroke-dash="Dash" svg:stroke-width="0.106cm" svg:stroke-color="#ff860d" draw:marker-start-width="0.358cm" draw:marker-end="Arrowheads_20_3" draw:marker-end-width="0.458cm" draw:fill="none" draw:textarea-vertical-align="middle" fo:padding-top="0.177cm" fo:padding-bottom="0.177cm" fo:padding-left="0.302cm" fo:padding-right="0.302cm" loext:decorative="false"/>
    </style:style>
    <style:style style:name="gr11" style:family="graphic" style:parent-style-name="objectwithoutfill">
      <style:graphic-properties draw:stroke="solid" draw:stroke-dash="Dash" svg:stroke-width="0.106cm" svg:stroke-color="#ff860d" draw:marker-start-width="0.358cm" draw:marker-end="Arrowheads_20_3" draw:marker-end-width="0.458cm" draw:fill="none" draw:textarea-vertical-align="middle" fo:padding-top="0.177cm" fo:padding-bottom="0.177cm" fo:padding-left="0.302cm" fo:padding-right="0.302cm" loext:decorative="false"/>
    </style:style>
    <style:style style:name="gr12" style:family="graphic" style:parent-style-name="objectwithoutfill">
      <style:graphic-properties draw:stroke="dash" draw:stroke-dash="Dash" svg:stroke-width="0.106cm" svg:stroke-color="#ff860d" draw:marker-start-width="0.358cm" draw:marker-end="Arrowheads_20_3" draw:marker-end-width="0.458cm" draw:fill="none" draw:textarea-vertical-align="middle" fo:padding-top="0.177cm" fo:padding-bottom="0.177cm" fo:padding-left="0.302cm" fo:padding-right="0.302cm" loext:decorative="false"/>
    </style:style>
    <style:style style:name="gr13" style:family="graphic" style:parent-style-name="objectwithoutfill">
      <style:graphic-properties draw:stroke="dash" draw:stroke-dash="Dash" svg:stroke-width="0.106cm" svg:stroke-color="#ff860d" draw:marker-start-width="0.358cm" draw:marker-end="Arrowheads_20_3" draw:marker-end-width="0.458cm" svg:stroke-linecap="butt" draw:fill="none" draw:textarea-vertical-align="middle" fo:padding-top="0.177cm" fo:padding-bottom="0.177cm" fo:padding-left="0.302cm" fo:padding-right="0.302cm" loext:decorative="false"/>
    </style:style>
    <style:style style:name="gr14" style:family="graphic" style:parent-style-name="objectwithoutfill">
      <style:graphic-properties draw:stroke="dash" draw:stroke-dash="Dash" svg:stroke-width="0.106cm" svg:stroke-color="#ffd428" draw:marker-start-width="0.358cm" draw:marker-end="Arrowheads_20_3" draw:marker-end-width="0.458cm" draw:stroke-linejoin="round" svg:stroke-linecap="butt" draw:fill="none" draw:textarea-vertical-align="middle" fo:padding-top="0.177cm" fo:padding-bottom="0.177cm" fo:padding-left="0.302cm" fo:padding-right="0.302cm" loext:decorative="false"/>
    </style:style>
    <style:style style:name="gr15" style:family="graphic" style:parent-style-name="objectwithoutfill">
      <style:graphic-properties draw:stroke="dash" draw:stroke-dash="Dash" svg:stroke-width="0.106cm" svg:stroke-color="#ffd428" draw:marker-start-width="0.358cm" draw:marker-end="Arrowheads_20_3" draw:marker-end-width="0.458cm" svg:stroke-linecap="butt" draw:fill="none" draw:textarea-vertical-align="middle" fo:padding-top="0.177cm" fo:padding-bottom="0.177cm" fo:padding-left="0.302cm" fo:padding-right="0.302cm" loext:decorative="false"/>
    </style:style>
    <style:style style:name="gr16" style:family="graphic" style:parent-style-name="objectwithoutfill">
      <style:graphic-properties draw:stroke="solid" draw:stroke-dash="Dash_20_Dot_20_4" svg:stroke-width="0.106cm" svg:stroke-color="#ffd428" draw:marker-start-width="0.358cm" draw:marker-end="Arrowheads_20_3" draw:marker-end-width="0.458cm" svg:stroke-linecap="butt" draw:fill="none" draw:textarea-vertical-align="middle" fo:padding-top="0.177cm" fo:padding-bottom="0.177cm" fo:padding-left="0.302cm" fo:padding-right="0.302cm" loext:decorative="false"/>
    </style:style>
    <style:style style:name="gr17"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169cm" fo:min-width="2.699cm" fo:padding-top="0.178cm" fo:padding-bottom="0.178cm" fo:padding-left="0.303cm" fo:padding-right="0.303cm" style:writing-mode="lr-tb" loext:decorative="false"/>
      <style:paragraph-properties style:writing-mode="lr-tb"/>
    </style:style>
    <style:style style:name="gr18"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661cm" fo:min-width="2.006cm" fo:padding-top="0.178cm" fo:padding-bottom="0.178cm" fo:padding-left="0.303cm" fo:padding-right="0.303cm" style:writing-mode="lr-tb" loext:decorative="false"/>
      <style:paragraph-properties style:writing-mode="lr-tb"/>
    </style:style>
    <style:style style:name="gr19"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528cm" fo:min-width="2.653cm" fo:padding-top="0.178cm" fo:padding-bottom="0.178cm" fo:padding-left="0.303cm" fo:padding-right="0.303cm" style:writing-mode="lr-tb" loext:decorative="false"/>
      <style:paragraph-properties style:writing-mode="lr-tb"/>
    </style:style>
    <style:style style:name="gr20" style:family="graphic" style:parent-style-name="standard" style:list-style-name="L1">
      <style:graphic-properties svg:stroke-width="0.106cm" svg:stroke-color="#e6e905" draw:marker-start-width="0.359cm" draw:marker-end-width="0.359cm" draw:fill-color="#b4c7dc" draw:textarea-horizontal-align="justify" draw:textarea-vertical-align="middle" draw:auto-grow-height="false" fo:min-height="1.02cm" fo:min-width="2.065cm" fo:padding-top="0.178cm" fo:padding-bottom="0.178cm" fo:padding-left="0.303cm" fo:padding-right="0.303cm" style:writing-mode="lr-tb" loext:decorative="false"/>
      <style:paragraph-properties style:writing-mode="lr-tb"/>
    </style:style>
    <style:style style:name="gr21"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661cm" fo:min-width="1.689cm" fo:padding-top="0.178cm" fo:padding-bottom="0.178cm" fo:padding-left="0.303cm" fo:padding-right="0.303cm" style:writing-mode="lr-tb" loext:decorative="false"/>
      <style:paragraph-properties style:writing-mode="lr-tb"/>
    </style:style>
    <style:style style:name="gr22" style:family="graphic" style:parent-style-name="standard" style:list-style-name="L1">
      <style:graphic-properties draw:fill-color="#f7d1d5" draw:textarea-horizontal-align="justify" draw:textarea-vertical-align="middle" draw:auto-grow-height="false" fo:min-height="1.469cm" fo:min-width="1.985cm" style:writing-mode="lr-tb" loext:decorative="false"/>
      <style:paragraph-properties style:writing-mode="lr-tb"/>
    </style:style>
    <style:style style:name="gr23" style:family="graphic" style:parent-style-name="standard" style:list-style-name="L1">
      <style:graphic-properties draw:fill-color="#f7d1d5" draw:textarea-horizontal-align="justify" draw:textarea-vertical-align="middle" draw:auto-grow-height="false" fo:min-height="1.757cm" fo:min-width="2.268cm" style:writing-mode="lr-tb" loext:decorative="false"/>
      <style:paragraph-properties style:writing-mode="lr-tb"/>
    </style:style>
    <style:style style:name="gr24" style:family="graphic" style:parent-style-name="standard" style:list-style-name="L1">
      <style:graphic-properties draw:fill-color="#f7d1d5" draw:textarea-horizontal-align="justify" draw:textarea-vertical-align="middle" draw:auto-grow-height="false" fo:min-height="1.273cm" fo:min-width="1.876cm" style:writing-mode="lr-tb" loext:decorative="false"/>
      <style:paragraph-properties style:writing-mode="lr-tb"/>
    </style:style>
    <style:style style:name="gr25"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387cm" fo:min-width="2.354cm" fo:padding-top="0.178cm" fo:padding-bottom="0.178cm" fo:padding-left="0.303cm" fo:padding-right="0.303cm" style:writing-mode="lr-tb" loext:decorative="false"/>
      <style:paragraph-properties style:writing-mode="lr-tb"/>
    </style:style>
    <style:style style:name="gr26"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827cm" fo:min-width="2.309cm" fo:padding-top="0.178cm" fo:padding-bottom="0.178cm" fo:padding-left="0.303cm" fo:padding-right="0.303cm" style:writing-mode="lr-tb" loext:decorative="false"/>
      <style:paragraph-properties style:writing-mode="lr-tb"/>
    </style:style>
    <style:style style:name="gr27"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2.244cm" fo:min-width="1.798cm" fo:padding-top="0.178cm" fo:padding-bottom="0.178cm" fo:padding-left="0.303cm" fo:padding-right="0.303cm" style:writing-mode="lr-tb" loext:decorative="false"/>
      <style:paragraph-properties style:writing-mode="lr-tb"/>
    </style:style>
    <style:style style:name="gr28" style:family="graphic" style:parent-style-name="standard" style:list-style-name="L1">
      <style:graphic-properties draw:fill-color="#f7d1d5" draw:textarea-horizontal-align="justify" draw:textarea-vertical-align="middle" draw:auto-grow-height="false" fo:min-height="0.896cm" fo:min-width="1.821cm" style:writing-mode="lr-tb" loext:decorative="false"/>
      <style:paragraph-properties style:writing-mode="lr-tb"/>
    </style:style>
    <style:style style:name="gr29"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573cm" fo:min-width="2.016cm" fo:padding-top="0.178cm" fo:padding-bottom="0.178cm" fo:padding-left="0.303cm" fo:padding-right="0.303cm" style:writing-mode="lr-tb" loext:decorative="false"/>
      <style:paragraph-properties style:writing-mode="lr-tb"/>
    </style:style>
    <style:style style:name="gr30"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095cm" fo:min-width="1.751cm" fo:padding-top="0.178cm" fo:padding-bottom="0.178cm" fo:padding-left="0.303cm" fo:padding-right="0.303cm" style:writing-mode="lr-tb" loext:decorative="false"/>
      <style:paragraph-properties style:writing-mode="lr-tb"/>
    </style:style>
    <style:style style:name="gr31" style:family="graphic" style:parent-style-name="standard" style:list-style-name="L1">
      <style:graphic-properties draw:fill-color="#f7d1d5" draw:textarea-horizontal-align="justify" draw:textarea-vertical-align="middle" draw:auto-grow-height="false" fo:min-height="0.896cm" fo:min-width="2.026cm" style:writing-mode="lr-tb" loext:decorative="false"/>
      <style:paragraph-properties style:writing-mode="lr-tb"/>
    </style:style>
    <style:style style:name="gr32"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2.532cm" fo:min-width="1.948cm" fo:padding-top="0.178cm" fo:padding-bottom="0.178cm" fo:padding-left="0.303cm" fo:padding-right="0.303cm" style:writing-mode="lr-tb" loext:decorative="false"/>
      <style:paragraph-properties style:writing-mode="lr-tb"/>
    </style:style>
    <style:style style:name="gr33" style:family="graphic" style:parent-style-name="standard" style:list-style-name="L1">
      <style:graphic-properties draw:fill-color="#f7d1d5" draw:textarea-horizontal-align="justify" draw:textarea-vertical-align="middle" draw:auto-grow-height="false" fo:min-height="1.044cm" fo:min-width="1.997cm" style:writing-mode="lr-tb" loext:decorative="false"/>
      <style:paragraph-properties style:writing-mode="lr-tb"/>
    </style:style>
    <style:style style:name="gr34"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938cm" fo:min-width="1.883cm" fo:padding-top="0.178cm" fo:padding-bottom="0.178cm" fo:padding-left="0.303cm" fo:padding-right="0.303cm" style:writing-mode="lr-tb" loext:decorative="false"/>
      <style:paragraph-properties style:writing-mode="lr-tb"/>
    </style:style>
    <style:style style:name="gr35" style:family="graphic" style:parent-style-name="standard" style:list-style-name="L1">
      <style:graphic-properties draw:fill-color="#f7d1d5" draw:textarea-horizontal-align="justify" draw:textarea-vertical-align="middle" draw:auto-grow-height="false" fo:min-height="1.579cm" fo:min-width="2.443cm" style:writing-mode="lr-tb" loext:decorative="false"/>
      <style:paragraph-properties style:writing-mode="lr-tb"/>
    </style:style>
    <style:style style:name="gr36" style:family="graphic" style:parent-style-name="standard" style:list-style-name="L1">
      <style:graphic-properties draw:fill-color="#f7d1d5" draw:textarea-horizontal-align="justify" draw:textarea-vertical-align="middle" draw:auto-grow-height="false" fo:min-height="1.098cm" fo:min-width="2.049cm" style:writing-mode="lr-tb" loext:decorative="false"/>
      <style:paragraph-properties style:writing-mode="lr-tb"/>
    </style:style>
    <style:style style:name="gr37"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661cm" fo:min-width="1.689cm" fo:padding-top="0.178cm" fo:padding-bottom="0.178cm" fo:padding-left="0.303cm" fo:padding-right="0.303cm" style:writing-mode="lr-tb" loext:decorative="false"/>
      <style:paragraph-properties style:writing-mode="lr-tb"/>
    </style:style>
    <style:style style:name="gr38" style:family="graphic" style:parent-style-name="standard" style:list-style-name="L1">
      <style:graphic-properties svg:stroke-width="0cm" svg:stroke-color="#3465a4" draw:marker-start-width="0.2cm" draw:marker-end-width="0.2cm" draw:fill-color="#b4c7dc" draw:textarea-horizontal-align="justify" draw:textarea-vertical-align="middle" draw:auto-grow-height="false" fo:min-height="1.072cm" fo:min-width="2.658cm" fo:padding-top="0.125cm" fo:padding-bottom="0.125cm" fo:padding-left="0.25cm" fo:padding-right="0.25cm" style:writing-mode="lr-tb" loext:decorative="false"/>
      <style:paragraph-properties style:writing-mode="lr-tb"/>
    </style:style>
    <style:style style:name="gr39" style:family="graphic" style:parent-style-name="standard" style:list-style-name="L1">
      <style:graphic-properties svg:stroke-width="0cm" svg:stroke-color="#3465a4" draw:marker-start-width="0.2cm" draw:marker-end-width="0.2cm" draw:fill-color="#b4c7dc" draw:textarea-horizontal-align="justify" draw:textarea-vertical-align="middle" draw:auto-grow-height="false" fo:min-height="1.183cm" fo:min-width="2.408cm" fo:padding-top="0.125cm" fo:padding-bottom="0.125cm" fo:padding-left="0.25cm" fo:padding-right="0.25cm" style:writing-mode="lr-tb" loext:decorative="false"/>
      <style:paragraph-properties style:writing-mode="lr-tb"/>
    </style:style>
    <style:style style:name="gr40" style:family="graphic" style:parent-style-name="standard" style:list-style-name="L1">
      <style:graphic-properties svg:stroke-width="0cm" svg:stroke-color="#3465a4" draw:marker-start-width="0.2cm" draw:marker-end-width="0.2cm" draw:fill-color="#b4c7dc" draw:textarea-horizontal-align="justify" draw:textarea-vertical-align="middle" draw:auto-grow-height="false" fo:min-height="0.885cm" fo:min-width="2.488cm" fo:padding-top="0.125cm" fo:padding-bottom="0.125cm" fo:padding-left="0.25cm" fo:padding-right="0.25cm" style:writing-mode="lr-tb" loext:decorative="false"/>
      <style:paragraph-properties style:writing-mode="lr-tb"/>
    </style:style>
    <style:style style:name="gr41" style:family="graphic" style:parent-style-name="standard" style:list-style-name="L1">
      <style:graphic-properties svg:stroke-width="0cm" svg:stroke-color="#3465a4" draw:marker-start-width="0.2cm" draw:marker-end-width="0.2cm" draw:fill-color="#f7d1d5" draw:textarea-horizontal-align="justify" draw:textarea-vertical-align="middle" draw:auto-grow-height="false" fo:min-height="0.885cm" fo:min-width="2.446cm" fo:padding-top="0.125cm" fo:padding-bottom="0.125cm" fo:padding-left="0.25cm" fo:padding-right="0.25cm" style:writing-mode="lr-tb" loext:decorative="false"/>
      <style:paragraph-properties style:writing-mode="lr-tb"/>
    </style:style>
    <style:style style:name="gr42" style:family="graphic" style:parent-style-name="standard" style:list-style-name="L1">
      <style:graphic-properties svg:stroke-width="0cm" svg:stroke-color="#3465a4" draw:marker-start-width="0.2cm" draw:marker-end-width="0.2cm" draw:fill-color="#b4c7dc" draw:textarea-horizontal-align="justify" draw:textarea-vertical-align="middle" draw:auto-grow-height="false" fo:min-height="1.081cm" fo:min-width="2.42cm" fo:padding-top="0.125cm" fo:padding-bottom="0.125cm" fo:padding-left="0.25cm" fo:padding-right="0.25cm" style:writing-mode="lr-tb" loext:decorative="false"/>
      <style:paragraph-properties style:writing-mode="lr-tb"/>
    </style:style>
    <style:style style:name="gr43"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651cm" fo:min-width="1.68cm" fo:padding-top="0.178cm" fo:padding-bottom="0.178cm" fo:padding-left="0.303cm" fo:padding-right="0.303cm" style:writing-mode="lr-tb" loext:decorative="false"/>
      <style:paragraph-properties style:writing-mode="lr-tb"/>
    </style:style>
    <style:style style:name="gr44"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651cm" fo:min-width="1.997cm" fo:padding-top="0.178cm" fo:padding-bottom="0.178cm" fo:padding-left="0.303cm" fo:padding-right="0.303cm" style:writing-mode="lr-tb" loext:decorative="false"/>
      <style:paragraph-properties style:writing-mode="lr-tb"/>
    </style:style>
    <style:style style:name="gr45"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286cm" fo:min-width="1.72cm" fo:padding-top="0.178cm" fo:padding-bottom="0.178cm" fo:padding-left="0.303cm" fo:padding-right="0.303cm" style:writing-mode="lr-tb" loext:decorative="false"/>
      <style:paragraph-properties style:writing-mode="lr-tb"/>
    </style:style>
    <style:style style:name="gr46"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661cm" fo:min-width="1.995cm" fo:padding-top="0.178cm" fo:padding-bottom="0.178cm" fo:padding-left="0.303cm" fo:padding-right="0.303cm" style:writing-mode="lr-tb" loext:decorative="false"/>
      <style:paragraph-properties style:writing-mode="lr-tb"/>
    </style:style>
    <style:style style:name="gr47"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661cm" fo:min-width="2.092cm" fo:padding-top="0.178cm" fo:padding-bottom="0.178cm" fo:padding-left="0.303cm" fo:padding-right="0.303cm" style:writing-mode="lr-tb" loext:decorative="false"/>
      <style:paragraph-properties style:writing-mode="lr-tb"/>
    </style:style>
    <style:style style:name="gr48"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3.494cm" fo:min-width="1.974cm" fo:padding-top="0.178cm" fo:padding-bottom="0.178cm" fo:padding-left="0.303cm" fo:padding-right="0.303cm" style:writing-mode="lr-tb" loext:decorative="false"/>
      <style:paragraph-properties style:writing-mode="lr-tb"/>
    </style:style>
    <style:style style:name="gr49"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661cm" fo:min-width="1.768cm" fo:padding-top="0.178cm" fo:padding-bottom="0.178cm" fo:padding-left="0.303cm" fo:padding-right="0.303cm" style:writing-mode="lr-tb" loext:decorative="false"/>
      <style:paragraph-properties style:writing-mode="lr-tb"/>
    </style:style>
    <style:style style:name="gr50" style:family="graphic" style:parent-style-name="standard" style:list-style-name="L1">
      <style:graphic-properties svg:stroke-width="0.106cm" svg:stroke-color="#ff0000" draw:marker-start-width="0.359cm" draw:marker-end-width="0.359cm" draw:fill-color="#b4c7dc" draw:textarea-horizontal-align="justify" draw:textarea-vertical-align="middle" draw:auto-grow-height="false" fo:min-height="1.661cm" fo:min-width="2.088cm" fo:padding-top="0.178cm" fo:padding-bottom="0.178cm" fo:padding-left="0.303cm" fo:padding-right="0.303cm" style:writing-mode="lr-tb" loext:decorative="false"/>
      <style:paragraph-properties style:writing-mode="lr-tb"/>
    </style:style>
    <style:style style:name="gr51" style:family="graphic" style:parent-style-name="standard" style:list-style-name="L1">
      <style:graphic-properties draw:fill-color="#f7d1d5" draw:textarea-horizontal-align="justify" draw:textarea-vertical-align="middle" draw:auto-grow-height="false" fo:min-height="1.201cm" fo:min-width="1.71cm" style:writing-mode="lr-tb" loext:decorative="false"/>
      <style:paragraph-properties style:writing-mode="lr-tb"/>
    </style:style>
    <style:style style:name="gr52" style:family="graphic" style:parent-style-name="standard" style:list-style-name="L1">
      <style:graphic-properties draw:fill-color="#f7d1d5" draw:textarea-horizontal-align="justify" draw:textarea-vertical-align="middle" draw:auto-grow-height="false" fo:min-height="1.201cm" fo:min-width="2.245cm" style:writing-mode="lr-tb" loext:decorative="false"/>
      <style:paragraph-properties style:writing-mode="lr-tb"/>
    </style:style>
    <style:style style:name="gr53" style:family="graphic" style:parent-style-name="standard" style:list-style-name="L1">
      <style:graphic-properties svg:stroke-width="0cm" svg:stroke-color="#3465a4" draw:marker-start-width="0.2cm" draw:marker-end-width="0.2cm" draw:fill-color="#b4c7dc" draw:textarea-horizontal-align="justify" draw:textarea-vertical-align="middle" draw:auto-grow-height="false" fo:min-height="0.896cm" fo:min-width="2.234cm" fo:padding-top="0.125cm" fo:padding-bottom="0.125cm" fo:padding-left="0.25cm" fo:padding-right="0.25cm" style:writing-mode="lr-tb" loext:decorative="false"/>
      <style:paragraph-properties style:writing-mode="lr-tb"/>
    </style:style>
    <style:style style:name="gr54" style:family="graphic" style:parent-style-name="standard" style:list-style-name="L1">
      <style:graphic-properties draw:fill-color="#f7d1d5" draw:textarea-horizontal-align="justify" draw:textarea-vertical-align="middle" draw:auto-grow-height="false" fo:min-height="1.201cm" fo:min-width="1.854cm" style:writing-mode="lr-tb" loext:decorative="false"/>
      <style:paragraph-properties style:writing-mode="lr-tb"/>
    </style:style>
    <style:style style:name="gr55" style:family="graphic" style:parent-style-name="standard" style:list-style-name="L1">
      <style:graphic-properties draw:fill-color="#f7d1d5" draw:textarea-horizontal-align="justify" draw:textarea-vertical-align="middle" draw:auto-grow-height="false" fo:min-height="1.201cm" fo:min-width="1.912cm" style:writing-mode="lr-tb" loext:decorative="false"/>
      <style:paragraph-properties style:writing-mode="lr-tb"/>
    </style:style>
    <style:style style:name="gr56" style:family="graphic" style:parent-style-name="standard" style:list-style-name="L1">
      <style:graphic-properties draw:fill-color="#f7d1d5" draw:textarea-horizontal-align="justify" draw:textarea-vertical-align="middle" draw:auto-grow-height="false" fo:min-height="1.201cm" fo:min-width="2.946cm" style:writing-mode="lr-tb" loext:decorative="false"/>
      <style:paragraph-properties style:writing-mode="lr-tb"/>
    </style:style>
    <style:style style:name="gr57" style:family="graphic" style:parent-style-name="standard" style:list-style-name="L1">
      <style:graphic-properties svg:stroke-width="0.106cm" svg:stroke-color="#ff0000" draw:marker-start-width="0.359cm" draw:marker-end-width="0.359cm" draw:fill-color="#b4c7dc" draw:textarea-horizontal-align="justify" draw:textarea-vertical-align="middle" draw:auto-grow-height="false" fo:min-height="1.375cm" fo:min-width="1.748cm" fo:padding-top="0.178cm" fo:padding-bottom="0.178cm" fo:padding-left="0.303cm" fo:padding-right="0.303cm" style:writing-mode="lr-tb" loext:decorative="false"/>
      <style:paragraph-properties style:writing-mode="lr-tb"/>
    </style:style>
    <style:style style:name="gr58" style:family="graphic" style:parent-style-name="standard" style:list-style-name="L1">
      <style:graphic-properties svg:stroke-width="0.106cm" svg:stroke-color="#ff0000" draw:marker-start-width="0.359cm" draw:marker-end-width="0.359cm" draw:fill-color="#b4c7dc" draw:textarea-horizontal-align="justify" draw:textarea-vertical-align="middle" draw:auto-grow-height="false" fo:min-height="2.35cm" fo:min-width="3.971cm" fo:padding-top="0.178cm" fo:padding-bottom="0.178cm" fo:padding-left="0.303cm" fo:padding-right="0.303cm" style:writing-mode="lr-tb" loext:decorative="false"/>
      <style:paragraph-properties style:writing-mode="lr-tb"/>
    </style:style>
    <style:style style:name="gr59" style:family="graphic" style:parent-style-name="standard" style:list-style-name="L1">
      <style:graphic-properties svg:stroke-width="0.106cm" svg:stroke-color="#ff0000" draw:marker-start-width="0.359cm" draw:marker-end-width="0.359cm" draw:fill-color="#b4c7dc" draw:textarea-horizontal-align="justify" draw:textarea-vertical-align="middle" draw:auto-grow-height="false" fo:min-height="1.187cm" fo:min-width="3cm" fo:padding-top="0.178cm" fo:padding-bottom="0.178cm" fo:padding-left="0.303cm" fo:padding-right="0.303cm" style:writing-mode="lr-tb" loext:decorative="false"/>
      <style:paragraph-properties style:writing-mode="lr-tb"/>
    </style:style>
    <style:style style:name="gr60" style:family="graphic" style:parent-style-name="standard" style:list-style-name="L1">
      <style:graphic-properties draw:fill-color="#f7d1d5" draw:textarea-horizontal-align="justify" draw:textarea-vertical-align="middle" draw:auto-grow-height="false" fo:min-height="1.201cm" fo:min-width="1.706cm" style:writing-mode="lr-tb" loext:decorative="false"/>
      <style:paragraph-properties style:writing-mode="lr-tb"/>
    </style:style>
    <style:style style:name="gr61"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661cm" fo:min-width="2.006cm" fo:padding-top="0.178cm" fo:padding-bottom="0.178cm" fo:padding-left="0.303cm" fo:padding-right="0.303cm" style:writing-mode="lr-tb" loext:decorative="false"/>
      <style:paragraph-properties style:writing-mode="lr-tb"/>
    </style:style>
    <style:style style:name="gr62"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2.224cm" fo:min-width="3.374cm" fo:padding-top="0.178cm" fo:padding-bottom="0.178cm" fo:padding-left="0.303cm" fo:padding-right="0.303cm" style:writing-mode="lr-tb" loext:decorative="false"/>
      <style:paragraph-properties style:writing-mode="lr-tb"/>
    </style:style>
    <style:style style:name="gr63"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069cm" fo:min-width="1.744cm" fo:padding-top="0.178cm" fo:padding-bottom="0.178cm" fo:padding-left="0.303cm" fo:padding-right="0.303cm" style:writing-mode="lr-tb" loext:decorative="false"/>
      <style:paragraph-properties style:writing-mode="lr-tb"/>
    </style:style>
    <style:style style:name="gr64" style:family="graphic" style:parent-style-name="standard" style:list-style-name="L1">
      <style:graphic-properties draw:fill-color="#ffffff" draw:textarea-horizontal-align="justify" draw:textarea-vertical-align="middle" draw:auto-grow-height="false" fo:min-height="1.398cm" fo:min-width="2.611cm" fo:wrap-option="wrap" style:writing-mode="lr-tb" loext:decorative="false"/>
      <style:paragraph-properties style:writing-mode="lr-tb"/>
    </style:style>
    <style:style style:name="gr65" style:family="graphic" style:parent-style-name="standard" style:list-style-name="L1">
      <style:graphic-properties svg:stroke-width="0cm" svg:stroke-color="#3465a4" draw:marker-start-width="0.2cm" draw:marker-end-width="0.2cm" draw:fill-color="#b4c7dc" draw:textarea-horizontal-align="justify" draw:textarea-vertical-align="middle" draw:auto-grow-height="false" fo:min-height="2.208cm" fo:min-width="3.024cm" fo:padding-top="0.125cm" fo:padding-bottom="0.125cm" fo:padding-left="0.25cm" fo:padding-right="0.25cm" style:writing-mode="lr-tb" loext:decorative="false"/>
      <style:paragraph-properties style:writing-mode="lr-tb"/>
    </style:style>
    <style:style style:name="gr66" style:family="graphic" style:parent-style-name="standard" style:list-style-name="L1">
      <style:graphic-properties svg:stroke-width="0.106cm" svg:stroke-color="#e6e905" draw:marker-start-width="0.359cm" draw:marker-end-width="0.359cm" draw:fill-color="#b4c7dc" draw:textarea-horizontal-align="justify" draw:textarea-vertical-align="middle" draw:auto-grow-height="false" fo:min-height="1.433cm" fo:min-width="1.742cm" fo:padding-top="0.178cm" fo:padding-bottom="0.178cm" fo:padding-left="0.303cm" fo:padding-right="0.303cm" style:writing-mode="lr-tb" loext:decorative="false"/>
      <style:paragraph-properties style:writing-mode="lr-tb"/>
    </style:style>
    <style:style style:name="gr67" style:family="graphic" style:parent-style-name="standard" style:list-style-name="L1">
      <style:graphic-properties svg:stroke-width="0.106cm" svg:stroke-color="#e6e905" draw:marker-start-width="0.359cm" draw:marker-end-width="0.359cm" draw:fill-color="#b4c7dc" draw:textarea-horizontal-align="justify" draw:textarea-vertical-align="middle" draw:auto-grow-height="false" fo:min-height="1.02cm" fo:min-width="1.786cm" fo:padding-top="0.178cm" fo:padding-bottom="0.178cm" fo:padding-left="0.303cm" fo:padding-right="0.303cm" style:writing-mode="lr-tb" loext:decorative="false"/>
      <style:paragraph-properties style:writing-mode="lr-tb"/>
    </style:style>
    <style:style style:name="gr68" style:family="graphic" style:parent-style-name="standard" style:list-style-name="L1">
      <style:graphic-properties svg:stroke-width="0.106cm" svg:stroke-color="#e6e905" draw:marker-start-width="0.359cm" draw:marker-end-width="0.359cm" draw:fill-color="#b4c7dc" draw:textarea-horizontal-align="justify" draw:textarea-vertical-align="middle" draw:auto-grow-height="false" fo:min-height="1.005cm" fo:min-width="1.63cm" fo:padding-top="0.178cm" fo:padding-bottom="0.178cm" fo:padding-left="0.303cm" fo:padding-right="0.303cm" style:writing-mode="lr-tb" loext:decorative="false"/>
      <style:paragraph-properties style:writing-mode="lr-tb"/>
    </style:style>
    <style:style style:name="gr69" style:family="graphic" style:parent-style-name="standard" style:list-style-name="L1">
      <style:graphic-properties svg:stroke-width="0.106cm" svg:stroke-color="#e6e905" draw:marker-start-width="0.359cm" draw:marker-end-width="0.359cm" draw:fill-color="#b4c7dc" draw:textarea-horizontal-align="justify" draw:textarea-vertical-align="middle" draw:auto-grow-height="false" fo:min-height="1.02cm" fo:min-width="2.243cm" fo:padding-top="0.178cm" fo:padding-bottom="0.178cm" fo:padding-left="0.303cm" fo:padding-right="0.303cm" style:writing-mode="lr-tb" loext:decorative="false"/>
      <style:paragraph-properties style:writing-mode="lr-tb"/>
    </style:style>
    <style:style style:name="gr70" style:family="graphic" style:parent-style-name="standard" style:list-style-name="L1">
      <style:graphic-properties svg:stroke-width="0.106cm" svg:stroke-color="#ea7500" draw:marker-start-width="0.359cm" draw:marker-end-width="0.359cm" draw:fill-color="#f7d1d5" draw:textarea-horizontal-align="justify" draw:textarea-vertical-align="middle" draw:auto-grow-height="false" fo:min-height="1.077cm" fo:min-width="2.415cm" fo:padding-top="0.178cm" fo:padding-bottom="0.178cm" fo:padding-left="0.303cm" fo:padding-right="0.303cm" style:writing-mode="lr-tb" loext:decorative="false"/>
      <style:paragraph-properties style:writing-mode="lr-tb"/>
    </style:style>
    <style:style style:name="gr71" style:family="graphic" style:parent-style-name="standard" style:list-style-name="L1">
      <style:graphic-properties svg:stroke-width="0cm" svg:stroke-color="#3465a4" draw:marker-start-width="0.2cm" draw:marker-end-width="0.2cm" draw:fill-color="#b4c7dc" draw:textarea-horizontal-align="justify" draw:textarea-vertical-align="middle" draw:auto-grow-height="false" fo:min-height="0.885cm" fo:min-width="1.853cm" fo:padding-top="0.125cm" fo:padding-bottom="0.125cm" fo:padding-left="0.25cm" fo:padding-right="0.25cm" style:writing-mode="lr-tb" loext:decorative="false"/>
      <style:paragraph-properties style:writing-mode="lr-tb"/>
    </style:style>
    <style:style style:name="gr72" style:family="graphic" style:parent-style-name="standard" style:list-style-name="L1">
      <style:graphic-properties svg:stroke-width="0cm" svg:stroke-color="#3465a4" draw:marker-start-width="0.2cm" draw:marker-end-width="0.2cm" draw:fill-color="#f7d1d5" draw:textarea-horizontal-align="justify" draw:textarea-vertical-align="middle" draw:auto-grow-height="false" fo:min-height="0.885cm" fo:min-width="1.776cm" fo:padding-top="0.125cm" fo:padding-bottom="0.125cm" fo:padding-left="0.25cm" fo:padding-right="0.25cm" style:writing-mode="lr-tb" loext:decorative="false"/>
      <style:paragraph-properties style:writing-mode="lr-tb"/>
    </style:style>
    <style:style style:name="gr73" style:family="graphic" style:parent-style-name="standard" style:list-style-name="L1">
      <style:graphic-properties svg:stroke-width="0.106cm" svg:stroke-color="#e6e905" draw:marker-start-width="0.359cm" draw:marker-end-width="0.359cm" draw:fill-color="#b4c7dc" draw:textarea-horizontal-align="justify" draw:textarea-vertical-align="middle" draw:auto-grow-height="false" fo:min-height="1.02cm" fo:min-width="2.065cm" fo:padding-top="0.178cm" fo:padding-bottom="0.178cm" fo:padding-left="0.303cm" fo:padding-right="0.303cm" style:writing-mode="lr-tb" loext:decorative="false"/>
      <style:paragraph-properties style:writing-mode="lr-tb"/>
    </style:style>
    <style:style style:name="gr74" style:family="graphic" style:parent-style-name="standard" style:list-style-name="L1">
      <style:graphic-properties svg:stroke-width="0.106cm" svg:stroke-color="#e6e905" draw:marker-start-width="0.359cm" draw:marker-end-width="0.359cm" draw:fill-color="#b4c7dc" draw:textarea-horizontal-align="justify" draw:textarea-vertical-align="middle" draw:auto-grow-height="false" fo:min-height="1.02cm" fo:min-width="2.254cm" fo:padding-top="0.178cm" fo:padding-bottom="0.178cm" fo:padding-left="0.303cm" fo:padding-right="0.303cm" style:writing-mode="lr-tb" loext:decorative="false"/>
      <style:paragraph-properties style:writing-mode="lr-tb"/>
    </style:style>
    <style:style style:name="gr75" style:family="graphic" style:parent-style-name="standard" style:list-style-name="L1">
      <style:graphic-properties svg:stroke-width="0.106cm" svg:stroke-color="#e6e905" draw:marker-start-width="0.359cm" draw:marker-end-width="0.359cm" draw:fill-color="#b4c7dc" draw:textarea-horizontal-align="justify" draw:textarea-vertical-align="middle" draw:auto-grow-height="false" fo:min-height="1.02cm" fo:min-width="2.243cm" fo:padding-top="0.178cm" fo:padding-bottom="0.178cm" fo:padding-left="0.303cm" fo:padding-right="0.303cm" style:writing-mode="lr-tb" loext:decorative="false"/>
      <style:paragraph-properties style:writing-mode="lr-tb"/>
    </style:style>
    <style:style style:name="gr76" style:family="graphic" style:parent-style-name="standard" style:list-style-name="L1">
      <style:graphic-properties svg:stroke-width="0.106cm" svg:stroke-color="#e6e905" draw:marker-start-width="0.359cm" draw:marker-end-width="0.359cm" draw:fill-color="#b4c7dc" draw:textarea-horizontal-align="justify" draw:textarea-vertical-align="middle" draw:auto-grow-height="false" fo:min-height="1.02cm" fo:min-width="2.254cm" fo:padding-top="0.178cm" fo:padding-bottom="0.178cm" fo:padding-left="0.303cm" fo:padding-right="0.303cm" style:writing-mode="lr-tb" loext:decorative="false"/>
      <style:paragraph-properties style:writing-mode="lr-tb"/>
    </style:style>
    <style:style style:name="gr77" style:family="graphic" style:parent-style-name="standard" style:list-style-name="L1">
      <style:graphic-properties svg:stroke-width="0.106cm" svg:stroke-color="#e6e905" draw:marker-start-width="0.359cm" draw:marker-end-width="0.359cm" draw:fill-color="#b4c7dc" draw:textarea-horizontal-align="justify" draw:textarea-vertical-align="middle" draw:auto-grow-height="false" fo:min-height="1.02cm" fo:min-width="2.243cm" fo:padding-top="0.178cm" fo:padding-bottom="0.178cm" fo:padding-left="0.303cm" fo:padding-right="0.303cm" style:writing-mode="lr-tb" loext:decorative="false"/>
      <style:paragraph-properties style:writing-mode="lr-tb"/>
    </style:style>
    <style:style style:name="gr78" style:family="graphic" style:parent-style-name="standard" style:list-style-name="L1">
      <style:graphic-properties svg:stroke-width="0.106cm" svg:stroke-color="#e6e905" draw:marker-start-width="0.359cm" draw:marker-end-width="0.359cm" draw:fill-color="#b4c7dc" draw:textarea-horizontal-align="justify" draw:textarea-vertical-align="middle" draw:auto-grow-height="false" fo:min-height="1.02cm" fo:min-width="2.345cm" fo:padding-top="0.178cm" fo:padding-bottom="0.178cm" fo:padding-left="0.303cm" fo:padding-right="0.303cm" style:writing-mode="lr-tb" loext:decorative="false"/>
      <style:paragraph-properties style:writing-mode="lr-tb"/>
    </style:style>
    <style:style style:name="gr79" style:family="graphic" style:parent-style-name="standard" style:list-style-name="L1">
      <style:graphic-properties svg:stroke-width="0.106cm" svg:stroke-color="#e6e905" draw:marker-start-width="0.359cm" draw:marker-end-width="0.359cm" draw:fill-color="#b4c7dc" draw:textarea-horizontal-align="justify" draw:textarea-vertical-align="middle" draw:auto-grow-height="false" fo:min-height="1.02cm" fo:min-width="2.599cm" fo:padding-top="0.178cm" fo:padding-bottom="0.178cm" fo:padding-left="0.303cm" fo:padding-right="0.303cm" style:writing-mode="lr-tb" loext:decorative="false"/>
      <style:paragraph-properties style:writing-mode="lr-tb"/>
    </style:style>
    <style:style style:name="gr80" style:family="graphic" style:parent-style-name="standard" style:list-style-name="L1">
      <style:graphic-properties svg:stroke-width="0.106cm" svg:stroke-color="#e6e905" draw:marker-start-width="0.359cm" draw:marker-end-width="0.359cm" draw:fill-color="#b4c7dc" draw:textarea-horizontal-align="justify" draw:textarea-vertical-align="middle" draw:auto-grow-height="false" fo:min-height="1.387cm" fo:min-width="2.254cm" fo:padding-top="0.178cm" fo:padding-bottom="0.178cm" fo:padding-left="0.303cm" fo:padding-right="0.303cm" style:writing-mode="lr-tb" loext:decorative="false"/>
      <style:paragraph-properties style:writing-mode="lr-tb"/>
    </style:style>
    <style:style style:name="gr81" style:family="graphic" style:parent-style-name="standard" style:list-style-name="L1">
      <style:graphic-properties svg:stroke-width="0.106cm" svg:stroke-color="#e6e905" draw:marker-start-width="0.359cm" draw:marker-end-width="0.359cm" draw:fill-color="#b4c7dc" draw:textarea-horizontal-align="justify" draw:textarea-vertical-align="middle" draw:auto-grow-height="false" fo:min-height="1.02cm" fo:min-width="2.345cm" fo:padding-top="0.178cm" fo:padding-bottom="0.178cm" fo:padding-left="0.303cm" fo:padding-right="0.303cm" style:writing-mode="lr-tb" loext:decorative="false"/>
      <style:paragraph-properties style:writing-mode="lr-tb"/>
    </style:style>
    <style:style style:name="gr82" style:family="graphic" style:parent-style-name="standard" style:list-style-name="L1">
      <style:graphic-properties svg:stroke-width="0.106cm" svg:stroke-color="#e6e905" draw:marker-start-width="0.359cm" draw:marker-end-width="0.359cm" draw:fill-color="#b4c7dc" draw:textarea-horizontal-align="justify" draw:textarea-vertical-align="middle" draw:auto-grow-height="false" fo:min-height="1.02cm" fo:min-width="2.345cm" fo:padding-top="0.178cm" fo:padding-bottom="0.178cm" fo:padding-left="0.303cm" fo:padding-right="0.303cm" style:writing-mode="lr-tb" loext:decorative="false"/>
      <style:paragraph-properties style:writing-mode="lr-tb"/>
    </style:style>
    <style:style style:name="gr83" style:family="graphic" style:parent-style-name="standard" style:list-style-name="L1">
      <style:graphic-properties svg:stroke-width="0.106cm" svg:stroke-color="#e6e905" draw:marker-start-width="0.359cm" draw:marker-end-width="0.359cm" draw:fill-color="#b4c7dc" draw:textarea-horizontal-align="justify" draw:textarea-vertical-align="middle" draw:auto-grow-height="false" fo:min-height="1.02cm" fo:min-width="2.345cm" fo:padding-top="0.178cm" fo:padding-bottom="0.178cm" fo:padding-left="0.303cm" fo:padding-right="0.303cm" style:writing-mode="lr-tb" loext:decorative="false"/>
      <style:paragraph-properties style:writing-mode="lr-tb"/>
    </style:style>
    <style:style style:name="gr84" style:family="graphic" style:parent-style-name="standard" style:list-style-name="L1">
      <style:graphic-properties svg:stroke-width="0.106cm" svg:stroke-color="#e6e905" draw:marker-start-width="0.359cm" draw:marker-end-width="0.359cm" draw:fill-color="#b4c7dc" draw:textarea-horizontal-align="justify" draw:textarea-vertical-align="middle" draw:auto-grow-height="false" fo:min-height="1.02cm" fo:min-width="2.345cm" fo:padding-top="0.178cm" fo:padding-bottom="0.178cm" fo:padding-left="0.303cm" fo:padding-right="0.303cm" style:writing-mode="lr-tb" loext:decorative="false"/>
      <style:paragraph-properties style:writing-mode="lr-tb"/>
    </style:style>
    <style:style style:name="gr85" style:family="graphic" style:parent-style-name="standard" style:list-style-name="L1">
      <style:graphic-properties svg:stroke-width="0.106cm" svg:stroke-color="#e6e905" draw:marker-start-width="0.359cm" draw:marker-end-width="0.359cm" draw:fill-color="#b4c7dc" draw:textarea-horizontal-align="justify" draw:textarea-vertical-align="middle" draw:auto-grow-height="false" fo:min-height="1.02cm" fo:min-width="2.345cm" fo:padding-top="0.178cm" fo:padding-bottom="0.178cm" fo:padding-left="0.303cm" fo:padding-right="0.303cm" style:writing-mode="lr-tb" loext:decorative="false"/>
      <style:paragraph-properties style:writing-mode="lr-tb"/>
    </style:style>
    <style:style style:name="gr86" style:family="graphic" style:parent-style-name="standard" style:list-style-name="L1">
      <style:graphic-properties svg:stroke-width="0.106cm" svg:stroke-color="#e6e905" draw:marker-start-width="0.359cm" draw:marker-end-width="0.359cm" draw:fill-color="#b4c7dc" draw:textarea-horizontal-align="justify" draw:textarea-vertical-align="middle" draw:auto-grow-height="false" fo:min-height="1.02cm" fo:min-width="2.345cm" fo:padding-top="0.178cm" fo:padding-bottom="0.178cm" fo:padding-left="0.303cm" fo:padding-right="0.303cm" style:writing-mode="lr-tb" loext:decorative="false"/>
      <style:paragraph-properties style:writing-mode="lr-tb"/>
    </style:style>
    <style:style style:name="gr87" style:family="graphic" style:parent-style-name="standard" style:list-style-name="L1">
      <style:graphic-properties svg:stroke-width="0.106cm" svg:stroke-color="#e6e905" draw:marker-start-width="0.359cm" draw:marker-end-width="0.359cm" draw:fill-color="#b4c7dc" draw:textarea-horizontal-align="justify" draw:textarea-vertical-align="middle" draw:auto-grow-height="false" fo:min-height="1.02cm" fo:min-width="2.345cm" fo:padding-top="0.178cm" fo:padding-bottom="0.178cm" fo:padding-left="0.303cm" fo:padding-right="0.303cm" style:writing-mode="lr-tb" loext:decorative="false"/>
      <style:paragraph-properties style:writing-mode="lr-tb"/>
    </style:style>
    <style:style style:name="P1" style:family="paragraph">
      <loext:graphic-properties draw:fill="none"/>
      <style:paragraph-properties fo:text-align="center"/>
      <style:text-properties style:font-name="Outfit" fo:font-size="12pt"/>
    </style:style>
    <style:style style:name="P2" style:family="paragraph">
      <style:paragraph-properties fo:margin-left="0cm" fo:margin-right="0cm" fo:margin-top="0cm" fo:margin-bottom="0cm" fo:line-height="100%" fo:text-align="center" fo:text-indent="0cm"/>
      <style:text-properties style:font-name="Outfit" fo:font-size="12pt" style:font-size-asian="12pt" style:font-size-complex="12pt"/>
    </style:style>
    <style:style style:name="P3" style:family="paragraph">
      <loext:graphic-properties draw:fill-color="#ffffff"/>
      <style:paragraph-properties fo:margin-left="0cm" fo:margin-right="0cm" fo:margin-top="0cm" fo:margin-bottom="0cm" fo:line-height="100%" fo:text-align="center" fo:text-indent="0cm" style:writing-mode="lr-tb"/>
      <style:text-properties style:font-name="Outfit" fo:font-size="12pt" style:font-size-asian="12pt" style:font-size-complex="12pt"/>
    </style:style>
    <style:style style:name="P4" style:family="paragraph">
      <style:paragraph-properties fo:margin-left="0cm" fo:margin-right="0cm" fo:margin-top="0cm" fo:margin-bottom="0cm" fo:line-height="100%" fo:text-align="center" fo:text-indent="0cm"/>
      <style:text-properties style:font-name="Outfit" fo:font-size="12pt" fo:font-weight="bold" style:letter-kerning="true" style:font-name-asian="Microsoft YaHei" style:font-size-asian="18pt" style:font-weight-asian="bold" style:font-name-complex="Arial" style:font-size-complex="18pt" style:font-weight-complex="bold"/>
    </style:style>
    <style:style style:name="P5" style:family="paragraph">
      <loext:graphic-properties draw:fill-color="#b4c7dc"/>
      <style:paragraph-properties fo:margin-left="0cm" fo:margin-right="0cm" fo:margin-top="0cm" fo:margin-bottom="0cm" fo:line-height="100%" fo:text-align="center" fo:text-indent="0cm" style:writing-mode="lr-tb"/>
      <style:text-properties style:font-name="Outfit" fo:font-size="12pt" fo:font-weight="bold" style:letter-kerning="true" style:font-name-asian="Microsoft YaHei" style:font-size-asian="18pt" style:font-weight-asian="bold" style:font-name-complex="Arial" style:font-size-complex="18pt" style:font-weight-complex="bold"/>
    </style:style>
    <style:style style:name="P6" style:family="paragraph">
      <style:paragraph-properties fo:margin-left="0cm" fo:margin-right="0cm" fo:margin-top="0cm" fo:margin-bottom="0cm" fo:line-height="100%" fo:text-align="center" fo:text-indent="0cm"/>
      <style:text-properties style:font-name="Outfit" fo:font-size="12pt" fo:font-weight="normal" style:letter-kerning="true" style:font-name-asian="Microsoft YaHei" style:font-size-asian="18pt" style:font-weight-asian="normal" style:font-name-complex="Arial" style:font-size-complex="18pt" style:font-weight-complex="normal"/>
    </style:style>
    <style:style style:name="P7" style:family="paragraph">
      <loext:graphic-properties draw:fill-color="#f7d1d5"/>
      <style:paragraph-properties fo:margin-left="0cm" fo:margin-right="0cm" fo:margin-top="0cm" fo:margin-bottom="0cm" fo:line-height="100%" fo:text-align="center" fo:text-indent="0cm" style:writing-mode="lr-tb"/>
      <style:text-properties style:font-name="Outfit" fo:font-size="12pt" fo:font-weight="normal" style:letter-kerning="true" style:font-name-asian="Microsoft YaHei" style:font-size-asian="18pt" style:font-weight-asian="normal" style:font-name-complex="Arial" style:font-size-complex="18pt" style:font-weight-complex="normal"/>
    </style:style>
    <style:style style:name="P8" style:family="paragraph">
      <loext:graphic-properties draw:fill="none"/>
      <style:paragraph-properties fo:text-align="center"/>
      <style:text-properties style:font-name="Outfit" fo:font-size="11pt"/>
    </style:style>
    <style:style style:name="P9" style:family="paragraph">
      <style:paragraph-properties fo:margin-left="0cm" fo:margin-right="0cm" fo:margin-top="0cm" fo:margin-bottom="0cm" fo:line-height="100%" fo:text-align="center" fo:text-indent="0cm"/>
      <style:text-properties style:font-name="Outfit" fo:font-size="11pt"/>
    </style:style>
    <style:style style:name="P10" style:family="paragraph">
      <loext:graphic-properties draw:fill-color="#b4c7dc"/>
      <style:paragraph-properties fo:margin-left="0cm" fo:margin-right="0cm" fo:margin-top="0cm" fo:margin-bottom="0cm" fo:line-height="100%" fo:text-align="center" fo:text-indent="0cm" style:writing-mode="lr-tb"/>
      <style:text-properties style:font-name="Outfit" fo:font-size="11pt"/>
    </style:style>
    <style:style style:name="P11" style:family="paragraph">
      <style:paragraph-properties fo:margin-left="0cm" fo:margin-right="0cm" fo:margin-top="0cm" fo:margin-bottom="0cm" fo:line-height="100%" fo:text-align="center" fo:text-indent="0cm"/>
      <style:text-properties fo:color="#000000" loext:opacity="100%" style:font-name="Outfit" fo:font-size="11pt" style:letter-kerning="true" style:font-name-asian="Microsoft YaHei" style:font-size-asian="18pt" style:font-name-complex="Arial" style:font-size-complex="18pt"/>
    </style:style>
    <style:style style:name="P12" style:family="paragraph">
      <loext:graphic-properties draw:fill-color="#b4c7dc"/>
      <style:paragraph-properties fo:margin-left="0cm" fo:margin-right="0cm" fo:margin-top="0cm" fo:margin-bottom="0cm" fo:line-height="100%" fo:text-align="center" fo:text-indent="0cm" style:writing-mode="lr-tb"/>
      <style:text-properties fo:color="#000000" loext:opacity="100%" style:font-name="Outfit" fo:font-size="11pt" style:letter-kerning="true" style:font-name-asian="Microsoft YaHei" style:font-size-asian="18pt" style:font-name-complex="Arial" style:font-size-complex="18pt"/>
    </style:style>
    <style:style style:name="P13" style:family="paragraph">
      <loext:graphic-properties draw:fill-color="#f7d1d5"/>
      <style:paragraph-properties fo:margin-left="0cm" fo:margin-right="0cm" fo:margin-top="0cm" fo:margin-bottom="0cm" fo:line-height="100%" fo:text-align="center" fo:text-indent="0cm" style:writing-mode="lr-tb"/>
      <style:text-properties style:font-name="Outfit" fo:font-size="11pt"/>
    </style:style>
    <style:style style:name="P14" style:family="paragraph">
      <style:paragraph-properties fo:margin-left="0cm" fo:margin-right="0cm" fo:margin-top="0cm" fo:margin-bottom="0cm" fo:line-height="100%" fo:text-align="center" fo:text-indent="0cm"/>
      <style:text-properties style:text-position="0% 100%" style:font-name="Outfit" fo:font-size="11pt"/>
    </style:style>
    <style:style style:name="P15" style:family="paragraph">
      <loext:graphic-properties draw:fill-color="#b4c7dc"/>
      <style:paragraph-properties fo:margin-left="0cm" fo:margin-right="0cm" fo:margin-top="0cm" fo:margin-bottom="0cm" fo:line-height="100%" fo:text-align="center" fo:text-indent="0cm" style:writing-mode="lr-tb"/>
      <style:text-properties style:text-position="0% 100%" style:font-name="Outfit" fo:font-size="11pt"/>
    </style:style>
    <style:style style:name="P16" style:family="paragraph">
      <style:paragraph-properties fo:margin-left="0cm" fo:margin-right="0cm" fo:margin-top="0cm" fo:margin-bottom="0cm" fo:line-height="100%" fo:text-align="center" fo:text-indent="0cm"/>
      <style:text-properties style:text-position="0% 100%" style:font-name="Outfit" fo:font-size="11pt" fo:font-weight="bold" style:font-weight-asian="bold" style:font-weight-complex="bold"/>
    </style:style>
    <style:style style:name="P17" style:family="paragraph">
      <loext:graphic-properties draw:fill-color="#b4c7dc"/>
      <style:paragraph-properties fo:margin-left="0cm" fo:margin-right="0cm" fo:margin-top="0cm" fo:margin-bottom="0cm" fo:line-height="100%" fo:text-align="center" fo:text-indent="0cm" style:writing-mode="lr-tb"/>
      <style:text-properties style:text-position="0% 100%" style:font-name="Outfit" fo:font-size="11pt" fo:font-weight="bold" style:font-weight-asian="bold" style:font-weight-complex="bold"/>
    </style:style>
    <style:style style:name="P18" style:family="paragraph">
      <style:paragraph-properties fo:margin-left="0cm" fo:margin-right="0cm" fo:margin-top="0cm" fo:margin-bottom="0cm" fo:line-height="100%" fo:text-align="center" fo:text-indent="0cm"/>
      <style:text-properties style:font-name="Outfit" fo:font-size="11pt" fo:font-weight="bold" style:font-weight-asian="bold" style:font-weight-complex="bold"/>
    </style:style>
    <style:style style:name="P19" style:family="paragraph">
      <loext:graphic-properties draw:fill-color="#b4c7dc"/>
      <style:paragraph-properties fo:margin-left="0cm" fo:margin-right="0cm" fo:margin-top="0cm" fo:margin-bottom="0cm" fo:line-height="100%" fo:text-align="center" fo:text-indent="0cm" style:writing-mode="lr-tb"/>
      <style:text-properties style:font-name="Outfit" fo:font-size="11pt" fo:font-weight="bold" style:font-weight-asian="bold" style:font-weight-complex="bold"/>
    </style:style>
    <style:style style:name="P20" style:family="paragraph">
      <loext:graphic-properties draw:fill-color="#f7d1d5"/>
      <style:paragraph-properties fo:margin-left="0cm" fo:margin-right="0cm" fo:margin-top="0cm" fo:margin-bottom="0cm" fo:line-height="100%" fo:text-align="center" fo:text-indent="0cm" style:writing-mode="lr-tb"/>
      <style:text-properties style:text-position="0% 100%" style:font-name="Outfit" fo:font-size="11pt"/>
    </style:style>
    <style:style style:name="P21" style:family="paragraph">
      <style:paragraph-properties fo:margin-left="0cm" fo:margin-right="0cm" fo:margin-top="0cm" fo:margin-bottom="0cm" fo:line-height="100%" fo:text-align="center" fo:text-indent="0cm"/>
      <style:text-properties style:font-name="Outfit" fo:font-size="11pt" fo:font-weight="bold" style:letter-kerning="true" style:font-name-asian="Microsoft YaHei" style:font-size-asian="18pt" style:font-weight-asian="bold" style:font-name-complex="Arial" style:font-size-complex="18pt" style:font-weight-complex="bold"/>
    </style:style>
    <style:style style:name="P22" style:family="paragraph">
      <loext:graphic-properties draw:fill-color="#b4c7dc"/>
      <style:paragraph-properties fo:margin-left="0cm" fo:margin-right="0cm" fo:margin-top="0cm" fo:margin-bottom="0cm" fo:line-height="100%" fo:text-align="center" fo:text-indent="0cm" style:writing-mode="lr-tb"/>
      <style:text-properties style:font-name="Outfit" fo:font-size="11pt" fo:font-weight="bold" style:letter-kerning="true" style:font-name-asian="Microsoft YaHei" style:font-size-asian="18pt" style:font-weight-asian="bold" style:font-name-complex="Arial" style:font-size-complex="18pt" style:font-weight-complex="bold"/>
    </style:style>
    <style:style style:name="P23" style:family="paragraph">
      <style:paragraph-properties fo:margin-left="0cm" fo:margin-right="0cm" fo:margin-top="0cm" fo:margin-bottom="0cm" fo:line-height="100%" fo:text-align="center" fo:text-indent="0cm"/>
      <style:text-properties style:font-name="Outfit" fo:font-size="11pt" fo:font-weight="normal" style:letter-kerning="true" style:font-name-asian="Microsoft YaHei" style:font-size-asian="18pt" style:font-weight-asian="normal" style:font-name-complex="Arial" style:font-size-complex="18pt" style:font-weight-complex="normal"/>
    </style:style>
    <style:style style:name="P24" style:family="paragraph">
      <loext:graphic-properties draw:fill-color="#f7d1d5"/>
      <style:paragraph-properties fo:margin-left="0cm" fo:margin-right="0cm" fo:margin-top="0cm" fo:margin-bottom="0cm" fo:line-height="100%" fo:text-align="center" fo:text-indent="0cm" style:writing-mode="lr-tb"/>
      <style:text-properties style:font-name="Outfit" fo:font-size="11pt" fo:font-weight="normal" style:letter-kerning="true" style:font-name-asian="Microsoft YaHei" style:font-size-asian="18pt" style:font-weight-asian="normal" style:font-name-complex="Arial" style:font-size-complex="18pt" style:font-weight-complex="normal"/>
    </style:style>
    <style:style style:name="P25" style:family="paragraph">
      <style:paragraph-properties fo:margin-left="0cm" fo:margin-right="0cm" fo:margin-top="0cm" fo:margin-bottom="0cm" fo:line-height="100%" fo:text-align="center" fo:text-indent="0cm"/>
      <style:text-properties style:font-name="Outfit" fo:font-size="11pt" fo:font-weight="bold" style:font-size-asian="12pt" style:font-weight-asian="bold" style:font-size-complex="12pt" style:font-weight-complex="bold"/>
    </style:style>
    <style:style style:name="P26" style:family="paragraph">
      <loext:graphic-properties draw:fill-color="#b4c7dc"/>
      <style:paragraph-properties fo:margin-left="0cm" fo:margin-right="0cm" fo:margin-top="0cm" fo:margin-bottom="0cm" fo:line-height="100%" fo:text-align="center" fo:text-indent="0cm" style:writing-mode="lr-tb"/>
      <style:text-properties style:font-name="Outfit" fo:font-size="11pt" fo:font-weight="bold" style:font-size-asian="12pt" style:font-weight-asian="bold" style:font-size-complex="12pt" style:font-weight-complex="bold"/>
    </style:style>
    <style:style style:name="P27" style:family="paragraph">
      <style:paragraph-properties fo:margin-left="0cm" fo:margin-right="0cm" fo:margin-top="0cm" fo:margin-bottom="0cm" fo:line-height="100%" fo:text-align="center" fo:text-indent="0cm"/>
      <style:text-properties style:font-name="Outfit" fo:font-size="11pt" style:font-size-asian="12pt" style:font-size-complex="12pt"/>
    </style:style>
    <style:style style:name="P28" style:family="paragraph">
      <loext:graphic-properties draw:fill-color="#ffffff"/>
      <style:paragraph-properties fo:margin-left="0cm" fo:margin-right="0cm" fo:margin-top="0cm" fo:margin-bottom="0cm" fo:line-height="100%" fo:text-align="center" fo:text-indent="0cm" style:writing-mode="lr-tb"/>
      <style:text-properties style:font-name="Outfit" fo:font-size="11pt" style:font-size-asian="12pt" style:font-size-complex="12pt"/>
    </style:style>
    <style:style style:name="P29" style:family="paragraph">
      <style:paragraph-properties fo:margin-left="0cm" fo:margin-right="0cm" fo:margin-top="0cm" fo:margin-bottom="0cm" fo:line-height="100%" fo:text-align="center" fo:text-indent="0cm"/>
      <style:text-properties fo:color="#000000" loext:opacity="100%" style:font-name="Outfit" fo:font-size="11pt" fo:font-weight="bold" style:letter-kerning="true" style:font-name-asian="Microsoft YaHei" style:font-size-asian="18pt" style:font-weight-asian="bold" style:font-name-complex="Arial" style:font-size-complex="18pt" style:font-weight-complex="bold"/>
    </style:style>
    <style:style style:name="P30" style:family="paragraph">
      <loext:graphic-properties draw:fill-color="#b4c7dc"/>
      <style:paragraph-properties fo:margin-left="0cm" fo:margin-right="0cm" fo:margin-top="0cm" fo:margin-bottom="0cm" fo:line-height="100%" fo:text-align="center" fo:text-indent="0cm" style:writing-mode="lr-tb"/>
      <style:text-properties fo:color="#000000" loext:opacity="100%" style:font-name="Outfit" fo:font-size="11pt" fo:font-weight="bold" style:letter-kerning="true" style:font-name-asian="Microsoft YaHei" style:font-size-asian="18pt" style:font-weight-asian="bold" style:font-name-complex="Arial" style:font-size-complex="18pt" style:font-weight-complex="bold"/>
    </style:style>
    <style:style style:name="P31" style:family="paragraph">
      <style:paragraph-properties fo:margin-left="0cm" fo:margin-right="0cm" fo:margin-top="0cm" fo:margin-bottom="0cm" fo:line-height="100%" fo:text-align="center" fo:text-indent="0cm"/>
      <style:text-properties fo:color="#000000" loext:opacity="100%" style:font-name="Outfit" fo:font-size="11pt" fo:font-weight="normal" style:letter-kerning="true" style:font-name-asian="Microsoft YaHei" style:font-size-asian="18pt" style:font-weight-asian="normal" style:font-name-complex="Arial" style:font-size-complex="18pt" style:font-weight-complex="normal"/>
    </style:style>
    <style:style style:name="P32" style:family="paragraph">
      <loext:graphic-properties draw:fill-color="#b4c7dc"/>
      <style:paragraph-properties fo:margin-left="0cm" fo:margin-right="0cm" fo:margin-top="0cm" fo:margin-bottom="0cm" fo:line-height="100%" fo:text-align="center" fo:text-indent="0cm" style:writing-mode="lr-tb"/>
      <style:text-properties fo:color="#000000" loext:opacity="100%" style:font-name="Outfit" fo:font-size="11pt" fo:font-weight="normal" style:letter-kerning="true" style:font-name-asian="Microsoft YaHei" style:font-size-asian="18pt" style:font-weight-asian="normal" style:font-name-complex="Arial" style:font-size-complex="18pt" style:font-weight-complex="normal"/>
    </style:style>
    <style:style style:name="T1" style:family="text">
      <style:text-properties style:font-name="Outfit" style:text-underline-style="solid" style:text-underline-width="auto" style:text-underline-color="font-color" fo:font-weight="bold" style:font-size-asian="12pt" style:font-weight-asian="bold" style:font-size-complex="12pt" style:font-weight-complex="bold"/>
    </style:style>
    <style:style style:name="T2" style:family="text">
      <style:text-properties style:font-name="Outfit" style:text-underline-style="none" fo:font-weight="normal" style:letter-kerning="true" style:font-name-asian="Microsoft YaHei" style:font-size-asian="12pt" style:font-weight-asian="normal" style:font-name-complex="Arial" style:font-size-complex="12pt" style:font-weight-complex="normal"/>
    </style:style>
    <style:style style:name="T3" style:family="text">
      <style:text-properties style:font-name="Outfit" style:text-underline-style="solid" style:text-underline-width="auto" style:text-underline-color="font-color" fo:font-weight="bold" style:letter-kerning="true" style:font-name-asian="Microsoft YaHei" style:font-size-asian="18pt" style:font-weight-asian="bold" style:font-name-complex="Arial" style:font-size-complex="18pt" style:font-weight-complex="bold"/>
    </style:style>
    <style:style style:name="T4" style:family="text">
      <style:text-properties style:font-name="Outfit" fo:font-weight="normal" style:letter-kerning="true" style:font-name-asian="Microsoft YaHei" style:font-size-asian="10pt" style:font-weight-asian="normal" style:font-name-complex="Arial" style:font-size-complex="10pt" style:font-weight-complex="normal"/>
    </style:style>
    <style:style style:name="T5" style:family="text">
      <style:text-properties style:font-name="Outfit" fo:font-size="11pt" style:text-underline-style="solid" style:text-underline-width="auto" style:text-underline-color="font-color" fo:font-weight="bold" style:font-size-asian="12pt" style:font-weight-asian="bold" style:font-size-complex="12pt" style:font-weight-complex="bold"/>
    </style:style>
    <style:style style:name="T6" style:family="text">
      <style:text-properties style:font-name="Outfit" fo:font-size="11pt" style:font-size-asian="10pt" style:font-size-complex="10pt"/>
    </style:style>
    <style:style style:name="T7" style:family="text">
      <style:text-properties style:text-position="0% 100%" style:font-name="Outfit" fo:font-size="11pt" fo:font-weight="normal" style:font-size-asian="10pt" style:font-weight-asian="normal" style:font-size-complex="10pt" style:font-weight-complex="normal"/>
    </style:style>
    <style:style style:name="T8" style:family="text">
      <style:text-properties style:text-position="0% 100%" style:font-name="Outfit" fo:font-size="11pt" fo:font-weight="normal" style:font-size-asian="12pt" style:font-weight-asian="normal" style:font-size-complex="12pt" style:font-weight-complex="normal"/>
    </style:style>
    <style:style style:name="T9" style:family="text">
      <style:text-properties fo:color="#000000" loext:opacity="100%" style:font-name="Outfit" fo:font-size="11pt" style:text-underline-style="solid" style:text-underline-width="auto" style:text-underline-color="font-color" fo:font-weight="bold" style:letter-kerning="true" style:font-name-asian="Microsoft YaHei" style:font-size-asian="18pt" style:font-weight-asian="bold" style:font-name-complex="Arial" style:font-size-complex="18pt" style:font-weight-complex="bold"/>
    </style:style>
    <style:style style:name="T10" style:family="text">
      <style:text-properties fo:color="#000000" loext:opacity="100%" style:font-name="Outfit" fo:font-size="11pt" style:letter-kerning="true" style:font-name-asian="Microsoft YaHei" style:font-size-asian="18pt" style:font-name-complex="Arial" style:font-size-complex="18pt"/>
    </style:style>
    <style:style style:name="T11" style:family="text">
      <style:text-properties fo:font-variant="normal" fo:text-transform="none" style:use-window-font-color="true" loext:opacity="0%" style:text-outline="false" style:text-line-through-style="none" style:text-line-through-type="none" style:font-name="Outfit" fo:font-size="11pt" fo:font-style="normal" fo:text-shadow="none" style:text-underline-style="solid" style:text-underline-width="auto" style:text-underline-color="font-color" fo:font-weight="bold" style:letter-kerning="true" style:font-name-asian="Microsoft YaHei" style:font-size-asian="12pt" style:font-style-asian="normal" style:font-weight-asian="bold" style:font-name-complex="Arial" style:font-size-complex="12pt" style:font-style-complex="normal" style:font-weight-complex="bold"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text-position="0% 100%" style:font-name="Outfit" fo:font-size="11pt" fo:font-style="normal" fo:text-shadow="none" style:text-underline-style="none" fo:font-weight="normal" style:letter-kerning="true" style:font-name-asian="Microsoft YaHei"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T13" style:family="text">
      <style:text-properties style:text-position="0% 100%" style:font-name="Outfit" fo:font-size="11pt" style:text-underline-style="solid" style:text-underline-width="auto" style:text-underline-color="font-color" fo:font-weight="bold" style:font-size-asian="12pt" style:font-weight-asian="bold" style:font-size-complex="12pt" style:font-weight-complex="bold"/>
    </style:style>
    <style:style style:name="T14" style:family="text">
      <style:text-properties style:font-name="Outfit" fo:font-size="11pt" fo:font-weight="normal" style:font-size-asian="10pt" style:font-weight-asian="normal" style:font-size-complex="10pt" style:font-weight-complex="normal"/>
    </style:style>
    <style:style style:name="T15" style:family="text">
      <style:text-properties fo:font-variant="normal" fo:text-transform="none" style:use-window-font-color="true" loext:opacity="0%" style:text-outline="false" style:text-line-through-style="none" style:text-line-through-type="none" style:text-position="0% 100%" style:font-name="Outfit" fo:font-size="11pt" fo:font-style="normal" fo:text-shadow="none" style:text-underline-style="solid" style:text-underline-width="auto" style:text-underline-color="font-color" fo:font-weight="bold" style:letter-kerning="true" style:font-name-asian="Microsoft YaHei" style:font-size-asian="12pt" style:font-style-asian="normal" style:font-weight-asian="bold" style:font-name-complex="Arial" style:font-size-complex="12pt" style:font-style-complex="normal" style:font-weight-complex="bold" style:text-emphasize="none"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text-position="0% 100%" style:font-name="Outfit" fo:font-size="11pt" fo:font-style="normal" fo:text-shadow="none" style:text-underline-style="none" fo:font-weight="normal" style:letter-kerning="true" style:font-name-asian="Microsoft YaHei"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17" style:family="text">
      <style:text-properties style:font-name="Outfit" fo:font-size="11pt" style:text-underline-style="solid" style:text-underline-width="auto" style:text-underline-color="font-color" fo:font-weight="bold" style:letter-kerning="true" style:font-name-asian="Microsoft YaHei" style:font-size-asian="18pt" style:font-weight-asian="bold" style:font-name-complex="Arial" style:font-size-complex="18pt" style:font-weight-complex="bold"/>
    </style:style>
    <style:style style:name="T18" style:family="text">
      <style:text-properties style:font-name="Outfit" fo:font-size="11pt" fo:font-weight="normal" style:letter-kerning="true" style:font-name-asian="Microsoft YaHei" style:font-size-asian="10pt" style:font-weight-asian="normal" style:font-name-complex="Arial" style:font-size-complex="10pt" style:font-weight-complex="normal"/>
    </style:style>
    <style:style style:name="T19" style:family="text">
      <style:text-properties fo:font-variant="normal" fo:text-transform="none" style:use-window-font-color="true" loext:opacity="0%" style:text-outline="false" style:text-line-through-style="none" style:text-line-through-type="none" style:font-name="Outfit" fo:font-size="11pt" fo:font-style="normal" fo:text-shadow="none" style:text-underline-style="none" fo:font-weight="normal" style:letter-kerning="true" style:font-name-asian="Microsoft YaHei"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20" style:family="text">
      <style:text-properties style:text-position="0% 100%" style:font-name="Outfit" fo:font-size="11pt" style:text-underline-style="solid" style:text-underline-width="auto" style:text-underline-color="font-color" fo:font-weight="bold" style:font-weight-asian="bold" style:font-weight-complex="bold"/>
    </style:style>
    <style:style style:name="T21" style:family="text">
      <style:text-properties style:text-position="0% 100%" style:font-name="Outfit" fo:font-size="11pt" fo:font-weight="normal" style:font-weight-asian="normal" style:font-weight-complex="normal"/>
    </style:style>
    <style:style style:name="T22" style:family="text">
      <style:text-properties fo:font-variant="normal" fo:text-transform="none" style:use-window-font-color="true" loext:opacity="0%" style:text-outline="false" style:text-line-through-style="none" style:text-line-through-type="none" style:text-position="0% 100%" style:font-name="Outfit" fo:font-size="11pt" fo:font-style="normal" fo:text-shadow="none" style:text-underline-style="none" fo:font-weight="bold" style:letter-kerning="true" style:font-name-asian="Microsoft YaHei" style:font-size-asian="12pt" style:font-style-asian="normal" style:font-weight-asian="bold" style:font-name-complex="Arial" style:font-size-complex="12pt" style:font-style-complex="normal" style:font-weight-complex="bold" style:text-emphasize="none" style:font-relief="none" style:text-overline-style="none" style:text-overline-color="font-color"/>
    </style:style>
    <style:style style:name="T23" style:family="text">
      <style:text-properties style:font-name="Outfit" fo:font-size="11pt" style:text-underline-style="solid" style:text-underline-width="auto" style:text-underline-color="font-color" fo:font-weight="bold" style:font-weight-asian="bold" style:font-weight-complex="bold"/>
    </style:style>
    <style:style style:name="T24" style:family="text">
      <style:text-properties style:text-position="0% 100%" style:font-name="Outfit" fo:font-size="11pt" style:text-underline-style="none" fo:font-weight="bold" style:font-weight-asian="bold" style:font-weight-complex="bold"/>
    </style:style>
    <style:style style:name="T25" style:family="text">
      <style:text-properties style:text-position="super 58%" style:font-name="Outfit" fo:font-size="11pt" fo:font-weight="normal" style:font-size-asian="12pt" style:font-weight-asian="normal" style:font-size-complex="12pt" style:font-weight-complex="normal"/>
    </style:style>
    <style:style style:name="T26" style:family="text">
      <style:text-properties style:font-name="Outfit" fo:font-size="11pt" style:text-underline-style="none" fo:font-weight="normal" style:letter-kerning="true" style:font-name-asian="Microsoft YaHei" style:font-size-asian="12pt" style:font-weight-asian="normal" style:font-name-complex="Arial" style:font-size-complex="12pt" style:font-weight-complex="normal"/>
    </style:style>
    <style:style style:name="T27" style:family="text">
      <style:text-properties style:font-name="Outfit" fo:font-size="11pt" style:text-underline-style="none" fo:font-weight="bold" style:letter-kerning="true" style:font-name-asian="Microsoft YaHei" style:font-size-asian="18pt" style:font-weight-asian="bold" style:font-name-complex="Arial" style:font-size-complex="18pt" style:font-weight-complex="bold"/>
    </style:style>
    <style:style style:name="T28" style:family="text">
      <style:text-properties style:font-name="Outfit" fo:font-size="11pt" style:text-underline-style="solid" style:text-underline-width="auto" style:text-underline-color="font-color" fo:font-weight="bold" style:letter-kerning="true" style:font-name-asian="Microsoft YaHei" style:font-size-asian="10pt" style:font-weight-asian="bold" style:font-name-complex="Arial" style:font-size-complex="10pt" style:font-weight-complex="bold"/>
    </style:style>
    <style:style style:name="T29" style:family="text">
      <style:text-properties fo:color="#000000" loext:opacity="100%" style:font-name="Outfit" fo:font-size="11pt" style:text-underline-style="none" fo:font-weight="normal" style:letter-kerning="true" style:font-name-asian="Microsoft YaHei" style:font-size-asian="18pt" style:font-weight-asian="normal" style:font-name-complex="Arial" style:font-size-complex="18pt" style:font-weight-complex="normal"/>
    </style:style>
    <style:style style:name="T30" style:family="text">
      <style:text-properties fo:color="#000000" loext:opacity="100%" style:font-name="Outfit" fo:font-size="11pt" fo:font-weight="normal" style:letter-kerning="true" style:font-name-asian="Microsoft YaHei" style:font-size-asian="18pt" style:font-weight-asian="normal" style:font-name-complex="Arial" style:font-size-complex="18pt" style:font-weight-complex="normal"/>
    </style:style>
    <style:style style:name="T31" style:family="text">
      <style:text-properties fo:color="#000000" loext:opacity="100%" style:font-name="Outfit" fo:font-size="11pt" fo:font-weight="bold" style:letter-kerning="true" style:font-name-asian="Microsoft YaHei" style:font-size-asian="18pt" style:font-weight-asian="bold" style:font-name-complex="Arial" style:font-size-complex="18pt" style:font-weight-complex="bold"/>
    </style:style>
    <style:style style:name="T32" style:family="text">
      <style:text-properties fo:color="#000000" loext:opacity="100%" style:font-name="Outfit" fo:font-size="11pt" fo:font-weight="normal" style:letter-kerning="true" style:font-name-asian="Microsoft YaHei" style:font-size-asian="10pt" style:font-weight-asian="normal" style:font-name-complex="Arial" style:font-size-complex="10pt" style:font-weight-complex="normal"/>
    </style:style>
    <style:style style:name="T33" style:family="text">
      <style:text-properties style:text-position="0% 100%" style:font-name="Outfit" fo:font-size="11pt" fo:font-weight="bold" style:font-size-asian="12pt" style:font-weight-asian="bold" style:font-size-complex="12pt" style:font-weight-complex="bold"/>
    </style:style>
    <style:style style:name="T34" style:family="text">
      <style:text-properties fo:color="#000000" loext:opacity="100%" style:font-name="Outfit" fo:font-size="11pt" style:text-underline-style="solid" style:text-underline-width="auto" style:text-underline-color="font-color" fo:font-weight="bold" style:letter-kerning="true" style:font-name-asian="Microsoft YaHei" style:font-size-asian="10pt" style:font-weight-asian="bold" style:font-name-complex="Arial" style:font-size-complex="10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onnector draw:style-name="gr1" draw:text-style-name="P1" draw:layer="layout" svg:x1="9.19cm" svg:y1="5.53cm" svg:x2="10.748cm" svg:y2="7.264cm" draw:start-shape="id1" draw:start-glue-point="0" draw:end-shape="id2" draw:end-glue-point="0" svg:d="M9190 5530v923h1558v811" svg:viewBox="0 0 1559 1735">
          <text:p/>
        </draw:connector>
        <draw:custom-shape draw:style-name="gr2" draw:text-style-name="P3" draw:layer="layout" svg:width="6.032cm" svg:height="2.54cm" svg:x="7.779cm" svg:y="1.079cm">
          <draw:glue-point draw:id="4" svg:x="-0.726cm" svg:y="4.862cm"/>
          <draw:glue-point draw:id="5" svg:x="1.272cm" svg:y="3.614cm"/>
          <draw:glue-point draw:id="6" svg:x="0.39cm" svg:y="-4.051cm"/>
          <text:p text:style-name="P2"><text:span text:style-name="T1">God</text:span></text:p>
          <text:p text:style-name="P2"><text:span text:style-name="T2">Gen 1:27, 2:7, 2:22</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 draw:text-style-name="P1" draw:layer="layout" svg:x1="9.19cm" svg:y1="5.53cm" svg:x2="7.747cm" svg:y2="7.264cm" draw:start-shape="id1" draw:start-glue-point="0" draw:end-shape="id3" draw:end-glue-point="0" svg:d="M9190 5530v923h-1443v811" svg:viewBox="0 0 1444 1735">
          <text:p/>
        </draw:connector>
        <draw:custom-shape draw:style-name="gr3" draw:text-style-name="P5" xml:id="id3" draw:id="id3" draw:layer="layout" svg:width="2.54cm" svg:height="1.27cm" svg:x="6.477cm" svg:y="7.264cm">
          <text:p text:style-name="P4"><text:span text:style-name="T3">Cain</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4" draw:text-style-name="P5" xml:id="id5" draw:id="id5" draw:layer="layout" svg:width="3.24cm" svg:height="1.27cm" svg:x="5.554cm" svg:y="4.902cm">
          <text:p text:style-name="P4"><text:span text:style-name="T3">Adam</text:span></text:p>
          <text:p text:style-name="P4"><text:span text:style-name="T4">Gen 1:27, 2:7</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5" draw:text-style-name="P7" xml:id="id4" draw:id="id4" draw:layer="layout" svg:width="2.54cm" svg:height="1.27cm" svg:x="9.587cm" svg:y="4.889cm">
          <text:p text:style-name="P6"><text:span text:style-name="T3">Eve</text:span></text:p>
          <text:p text:style-name="P6"><text:span text:style-name="T4">Gen 2:22</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6" draw:text-style-name="P1" xml:id="id1" draw:id="id1" draw:layer="layout" draw:type="line" svg:x1="9.587cm" svg:y1="5.524cm" svg:x2="8.794cm" svg:y2="5.537cm" draw:start-shape="id4" draw:start-glue-point="5" draw:end-shape="id5" draw:end-glue-point="7" svg:d="M9587 5524l-793 13" svg:viewBox="0 0 794 14">
          <text:p/>
        </draw:connector>
        <draw:custom-shape draw:style-name="gr7" draw:text-style-name="P5" xml:id="id2" draw:id="id2" draw:layer="layout" svg:width="2.54cm" svg:height="1.27cm" svg:x="9.478cm" svg:y="7.264cm">
          <text:p text:style-name="P4"><text:span text:style-name="T3">Abel</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page>
      <draw:page draw:name="page2" draw:style-name="dp1" draw:master-page-name="Default">
        <draw:connector draw:style-name="gr8" draw:text-style-name="P8" draw:layer="layout" draw:type="curve" svg:x1="15.542cm" svg:y1="69.16cm" svg:x2="15.541cm" svg:y2="71.158cm" draw:start-shape="id6" draw:start-glue-point="0" draw:end-shape="id7" draw:end-glue-point="0" svg:d="M15542 69160c0 1540-1 542-1 1998" svg:viewBox="0 0 2 1999">
          <text:p/>
        </draw:connector>
        <draw:connector draw:style-name="gr6" draw:text-style-name="P8" xml:id="id6" draw:id="id6" draw:layer="layout" draw:type="curve" svg:x1="15.118cm" svg:y1="69.162cm" svg:x2="15.885cm" svg:y2="69.159cm" draw:start-shape="id8" draw:start-glue-point="7" draw:end-shape="id9" draw:end-glue-point="5" svg:d="M15118 69162c616 0 233-3 767-3" svg:viewBox="0 0 768 4">
          <text:p/>
        </draw:connector>
        <draw:connector draw:style-name="gr9" draw:text-style-name="P8" draw:layer="layout" draw:type="curve" svg:x1="13.111cm" svg:y1="6.982cm" svg:x2="10.496cm" svg:y2="9.556cm" draw:start-shape="id10" draw:start-glue-point="2" draw:end-shape="id11" draw:end-glue-point="8" svg:d="M13111 6982c0 1716-871 2574-2615 2574" svg:viewBox="0 0 2616 2575">
          <text:p/>
        </draw:connector>
        <draw:connector draw:style-name="gr9" draw:text-style-name="P8" draw:layer="layout" draw:type="curve" svg:x1="23.498cm" svg:y1="35.163cm" svg:x2="20.964cm" svg:y2="35.42cm" draw:start-shape="id12" draw:start-glue-point="2" draw:end-shape="id13" draw:end-glue-point="8" svg:d="M23498 35163c0 1215-2534 1086-2534 257" svg:viewBox="0 0 2535 897">
          <text:p/>
        </draw:connector>
        <draw:connector draw:style-name="gr9" draw:text-style-name="P8" draw:layer="layout" draw:type="curve" svg:x1="21.78cm" svg:y1="51.488cm" svg:x2="21.78cm" svg:y2="53.689cm" draw:start-shape="id14" draw:start-glue-point="7" draw:end-shape="id15" draw:end-glue-point="7" svg:d="M21780 51488c829 0 829 2201 0 2201" svg:viewBox="0 0 623 2202">
          <text:p/>
        </draw:connector>
        <draw:connector draw:style-name="gr9" draw:text-style-name="P8" draw:layer="layout" draw:type="curve" svg:x1="21.78cm" svg:y1="37.784cm" svg:x2="21.909cm" svg:y2="39.917cm" draw:start-shape="id16" draw:start-glue-point="7" draw:end-shape="id17" draw:end-glue-point="7" svg:d="M21780 37784c1024 0 960 2133 129 2133" svg:viewBox="0 0 761 2134">
          <text:p/>
        </draw:connector>
        <draw:connector draw:style-name="gr9" draw:text-style-name="P8" draw:layer="layout" draw:type="curve" svg:x1="18.556cm" svg:y1="39.917cm" svg:x2="18.708cm" svg:y2="42.321cm" draw:start-shape="id17" draw:start-glue-point="5" draw:end-shape="id18" draw:end-glue-point="5" svg:d="M18556 39917c-831 0-907 2404 152 2404" svg:viewBox="0 0 786 2405">
          <text:p/>
        </draw:connector>
        <draw:connector draw:style-name="gr9" draw:text-style-name="P8" draw:layer="layout" draw:type="curve" svg:x1="21.756cm" svg:y1="42.321cm" svg:x2="21.78cm" svg:y2="44.732cm" draw:start-shape="id18" draw:start-glue-point="7" draw:end-shape="id19" draw:end-glue-point="7" svg:d="M21756 42321c865 0 853 2411 24 2411" svg:viewBox="0 0 648 2412">
          <text:p/>
        </draw:connector>
        <draw:connector draw:style-name="gr9" draw:text-style-name="P8" draw:layer="layout" draw:type="curve" svg:x1="18.681cm" svg:y1="44.732cm" svg:x2="18.681cm" svg:y2="46.986cm" draw:start-shape="id19" draw:start-glue-point="5" draw:end-shape="id20" draw:end-glue-point="5" svg:d="M18681 44732c-831 0-831 2254 0 2254" svg:viewBox="0 0 624 2255">
          <text:p/>
        </draw:connector>
        <draw:connector draw:style-name="gr9" draw:text-style-name="P8" draw:layer="layout" draw:type="curve" svg:x1="21.78cm" svg:y1="55.79cm" svg:x2="21.78cm" svg:y2="57.991cm" draw:start-shape="id21" draw:start-glue-point="7" draw:end-shape="id22" draw:end-glue-point="7" svg:d="M21780 55790c829 0 829 2201 0 2201" svg:viewBox="0 0 623 2202">
          <text:p/>
        </draw:connector>
        <draw:connector draw:style-name="gr9" draw:text-style-name="P8" draw:layer="layout" draw:type="curve" svg:x1="18.681cm" svg:y1="53.689cm" svg:x2="18.681cm" svg:y2="55.79cm" draw:start-shape="id15" draw:start-glue-point="5" draw:end-shape="id21" draw:end-glue-point="5" svg:d="M18681 53689c-831 0-831 2101 0 2101" svg:viewBox="0 0 624 2102">
          <text:p/>
        </draw:connector>
        <draw:connector draw:style-name="gr8" draw:text-style-name="P8" draw:layer="layout" draw:type="curve" svg:x1="20.23cm" svg:y1="52.25cm" svg:x2="20.23cm" svg:y2="52.927cm" draw:start-shape="id14" draw:start-glue-point="2" draw:end-shape="id15" draw:end-glue-point="0" svg:d="M20230 52250v677" svg:viewBox="0 0 1 678">
          <text:p/>
        </draw:connector>
        <draw:connector draw:style-name="gr9" draw:text-style-name="P8" draw:layer="layout" draw:type="curve" svg:x1="18.681cm" svg:y1="49.187cm" svg:x2="18.681cm" svg:y2="51.488cm" draw:start-shape="id23" draw:start-glue-point="5" draw:end-shape="id14" draw:end-glue-point="5" svg:d="M18681 49187c-831 0-831 2301 0 2301" svg:viewBox="0 0 624 2302">
          <text:p/>
        </draw:connector>
        <draw:connector draw:style-name="gr9" draw:text-style-name="P8" draw:layer="layout" draw:type="curve" svg:x1="21.78cm" svg:y1="46.986cm" svg:x2="21.78cm" svg:y2="49.187cm" draw:start-shape="id20" draw:start-glue-point="7" draw:end-shape="id23" draw:end-glue-point="7" svg:d="M21780 46986c829 0 829 2201 0 2201" svg:viewBox="0 0 623 2202">
          <text:p/>
        </draw:connector>
        <draw:connector draw:style-name="gr8" draw:text-style-name="P8" draw:layer="layout" draw:type="curve" svg:x1="20.23cm" svg:y1="45.494cm" svg:x2="20.23cm" svg:y2="46.224cm" draw:start-shape="id19" draw:start-glue-point="2" draw:end-shape="id20" draw:end-glue-point="0" svg:d="M20230 45494v730" svg:viewBox="0 0 1 731">
          <text:p/>
        </draw:connector>
        <draw:connector draw:style-name="gr8" draw:text-style-name="P8" draw:layer="layout" draw:type="curve" svg:x1="20.232cm" svg:y1="43.287cm" svg:x2="20.23cm" svg:y2="43.97cm" draw:start-shape="id18" draw:start-glue-point="2" draw:end-shape="id19" draw:end-glue-point="0" svg:d="M20232 43287c0 513-2 172-2 683" svg:viewBox="0 0 3 684">
          <text:p/>
        </draw:connector>
        <draw:connector draw:style-name="gr8" draw:text-style-name="P8" draw:layer="layout" draw:type="curve" svg:x1="20.232cm" svg:y1="40.679cm" svg:x2="20.232cm" svg:y2="41.356cm" draw:start-shape="id17" draw:start-glue-point="2" draw:end-shape="id18" draw:end-glue-point="0" svg:d="M20232 40679v677" svg:viewBox="0 0 1 678">
          <text:p/>
        </draw:connector>
        <draw:connector draw:style-name="gr8" draw:text-style-name="P8" draw:layer="layout" draw:type="curve" svg:x1="20.23cm" svg:y1="38.546cm" svg:x2="20.232cm" svg:y2="39.155cm" draw:start-shape="id16" draw:start-glue-point="2" draw:end-shape="id17" draw:end-glue-point="0" svg:d="M20230 38546c0 457 2 153 2 609" svg:viewBox="0 0 3 610">
          <text:p/>
        </draw:connector>
        <draw:connector draw:style-name="gr9" draw:text-style-name="P8" draw:layer="layout" draw:type="curve" svg:x1="20.23cm" svg:y1="35.42cm" svg:x2="20.23cm" svg:y2="37.022cm" draw:start-shape="id13" draw:start-glue-point="2" draw:end-shape="id16" draw:end-glue-point="0" svg:d="M20230 35420v1602" svg:viewBox="0 0 1 1603">
          <text:p/>
        </draw:connector>
        <draw:connector draw:style-name="gr8" draw:text-style-name="P8" draw:layer="layout" draw:type="curve" svg:x1="20.233cm" svg:y1="30.166cm" svg:x2="16.648cm" svg:y2="33.634cm" draw:start-shape="id24" draw:start-glue-point="0" draw:end-shape="id25" draw:end-glue-point="0" svg:d="M20233 30166c0 2640-3585 906-3585 3468" svg:viewBox="0 0 3586 3469">
          <text:p/>
        </draw:connector>
        <draw:connector draw:style-name="gr8" draw:text-style-name="P8" draw:layer="layout" draw:type="curve" svg:x1="20.233cm" svg:y1="30.166cm" svg:x2="20.23cm" svg:y2="33.439cm" draw:start-shape="id24" draw:start-glue-point="0" draw:end-shape="id13" draw:end-glue-point="0" svg:d="M20233 30166c0 2494-3 858-3 3273" svg:viewBox="0 0 4 3274">
          <text:p/>
        </draw:connector>
        <draw:connector draw:style-name="gr8" draw:text-style-name="P8" draw:layer="layout" draw:type="curve" svg:x1="20.233cm" svg:y1="30.166cm" svg:x2="23.498cm" svg:y2="33.639cm" draw:start-shape="id24" draw:start-glue-point="0" draw:end-shape="id12" draw:end-glue-point="0" svg:d="M20233 30166c0 2644 3265 908 3265 3473" svg:viewBox="0 0 3266 3474">
          <text:p/>
        </draw:connector>
        <draw:connector draw:style-name="gr10" draw:text-style-name="P8" draw:layer="layout" draw:type="curve" svg:x1="19.514cm" svg:y1="26.559cm" svg:x2="20.717cm" svg:y2="26.558cm" draw:start-shape="id26" draw:start-glue-point="7" draw:end-shape="id27" draw:end-glue-point="5" svg:d="M19514 26559c901 0 300-1 1203-1" svg:viewBox="0 0 1204 2">
          <text:p/>
        </draw:connector>
        <draw:connector draw:style-name="gr10" draw:text-style-name="P8" draw:layer="layout" draw:type="curve" svg:x1="22.212cm" svg:y1="24.462cm" svg:x2="18.015cm" svg:y2="25.797cm" draw:start-shape="id28" draw:start-glue-point="2" draw:end-shape="id26" draw:end-glue-point="0" svg:d="M22212 24462c0 1002-4197 335-4197 1335" svg:viewBox="0 0 4198 1336">
          <text:p/>
        </draw:connector>
        <draw:connector draw:style-name="gr10" draw:text-style-name="P8" draw:layer="layout" draw:type="curve" svg:x1="22.212cm" svg:y1="24.462cm" svg:x2="22.215cm" svg:y2="25.796cm" draw:start-shape="id28" draw:start-glue-point="2" draw:end-shape="id27" draw:end-glue-point="0" svg:d="M22212 24462c0 1002 3 335 3 1334" svg:viewBox="0 0 4 1335">
          <text:p/>
        </draw:connector>
        <draw:connector draw:style-name="gr11" draw:text-style-name="P8" draw:layer="layout" draw:type="curve" svg:x1="19.81cm" svg:y1="23.699cm" svg:x2="20.708cm" svg:y2="23.7cm" draw:start-shape="id29" draw:start-glue-point="7" draw:end-shape="id28" draw:end-glue-point="5" svg:d="M19810 23699c673 0 225 1 898 1" svg:viewBox="0 0 899 2">
          <text:p/>
        </draw:connector>
        <draw:connector draw:style-name="gr11" draw:text-style-name="P8" draw:layer="layout" draw:type="curve" svg:x1="17.569cm" svg:y1="21.7cm" svg:x2="17.575cm" svg:y2="22.937cm" draw:start-shape="id30" draw:start-glue-point="6" draw:end-shape="id29" draw:end-glue-point="4" svg:d="M17569 21700c0 928 6 310 6 1237" svg:viewBox="0 0 7 1238">
          <text:p/>
        </draw:connector>
        <draw:connector draw:style-name="gr8" draw:text-style-name="P8" draw:layer="layout" draw:type="curve" svg:x1="18.311cm" svg:y1="21.7cm" svg:x2="18.311cm" svg:y2="22.937cm" draw:start-shape="id30" draw:start-glue-point="2" draw:end-shape="id29" draw:end-glue-point="0" svg:d="M18311 21700v1237" svg:viewBox="0 0 1 1238">
          <text:p/>
        </draw:connector>
        <draw:connector draw:style-name="gr11" draw:text-style-name="P8" draw:layer="layout" draw:type="curve" svg:x1="21.569cm" svg:y1="19.4cm" svg:x2="21.569cm" svg:y2="20.176cm" draw:start-shape="id31" draw:start-glue-point="6" draw:end-shape="id32" draw:end-glue-point="4" svg:d="M21569 19400v776" svg:viewBox="0 0 1 777">
          <text:p/>
        </draw:connector>
        <draw:connector draw:style-name="gr8" draw:text-style-name="P8" draw:layer="layout" draw:type="curve" svg:x1="22.216cm" svg:y1="19.4cm" svg:x2="22.216cm" svg:y2="20.176cm" draw:start-shape="id31" draw:start-glue-point="2" draw:end-shape="id32" draw:end-glue-point="0" svg:d="M22216 19400v776" svg:viewBox="0 0 1 777">
          <text:p/>
        </draw:connector>
        <draw:connector draw:style-name="gr12" draw:text-style-name="P8" draw:layer="layout" draw:type="curve" svg:x1="18.872cm" svg:y1="12.779cm" svg:x2="20.807cm" svg:y2="18.638cm" draw:start-shape="id33" draw:start-glue-point="5" draw:end-shape="id31" draw:end-glue-point="5" svg:d="M18872 12779c0 3906 645 5859 1935 5859" svg:viewBox="0 0 1936 5860">
          <text:p/>
        </draw:connector>
        <draw:connector draw:style-name="gr8" draw:text-style-name="P8" draw:layer="layout" draw:type="curve" svg:x1="22.213cm" svg:y1="16.459cm" svg:x2="22.216cm" svg:y2="17.876cm" draw:start-shape="id34" draw:start-glue-point="0" draw:end-shape="id31" draw:end-glue-point="0" svg:d="M22213 16459c0 1102 3 394 3 1417" svg:viewBox="0 0 4 1418">
          <text:p/>
        </draw:connector>
        <draw:connector draw:style-name="gr13" draw:text-style-name="P8" draw:layer="layout" draw:type="curve" svg:x1="12.392cm" svg:y1="20.753cm" svg:x2="17.922cm" svg:y2="13.096cm" draw:start-shape="id35" draw:start-glue-point="8" draw:end-shape="id33" draw:end-glue-point="4" svg:d="M12392 20753c3687 0 5530-2552 5530-7657" svg:viewBox="0 0 5531 7658">
          <text:p/>
        </draw:connector>
        <draw:connector draw:style-name="gr8" draw:text-style-name="P8" draw:layer="layout" draw:type="curve" draw:line-skew="0.402cm" svg:x1="12.741cm" svg:y1="18.615cm" svg:x2="11.036cm" svg:y2="20.689cm" draw:start-shape="id36" draw:start-glue-point="0" draw:end-shape="id35" draw:end-glue-point="0" svg:d="M12741 18615c0 2197-1705 1161-1705 2074" svg:viewBox="0 0 1706 2075">
          <text:p/>
        </draw:connector>
        <draw:connector draw:style-name="gr6" draw:text-style-name="P8" xml:id="id36" draw:id="id36" draw:layer="layout" draw:type="curve" svg:x1="12.121cm" svg:y1="18.615cm" svg:x2="13.361cm" svg:y2="18.615cm" draw:start-shape="id37" draw:start-glue-point="7" draw:end-shape="id38" draw:end-glue-point="5" svg:d="M12121 18615h1240" svg:viewBox="0 0 1241 1">
          <text:p/>
        </draw:connector>
        <draw:line draw:style-name="gr9" draw:text-style-name="P8" draw:layer="layout" svg:x1="10.74cm" svg:y1="16.325cm" svg:x2="10.74cm" svg:y2="17.595cm">
          <text:p/>
        </draw:line>
        <draw:connector draw:style-name="gr14" draw:text-style-name="P8" draw:layer="layout" draw:type="curve" svg:x1="3.726cm" svg:y1="8.465cm" svg:x2="7.03cm" svg:y2="12.334cm" draw:start-shape="id39" draw:start-glue-point="6" draw:end-shape="id40" draw:end-glue-point="5" svg:d="M3726 8465c0 2580 1101 3869 3304 3869" svg:viewBox="0 0 3305 3870">
          <text:p/>
        </draw:connector>
        <draw:connector draw:style-name="gr9" draw:text-style-name="P8" draw:layer="layout" draw:type="line" svg:x1="10.985cm" svg:y1="61.123cm" svg:x2="10.94cm" svg:y2="61.944cm" draw:start-shape="id41" draw:start-glue-point="6" draw:end-shape="id42" draw:end-glue-point="4" svg:d="M10985 61123l-45 821" svg:viewBox="0 0 46 822">
          <text:p/>
        </draw:connector>
        <draw:connector draw:style-name="gr15" draw:text-style-name="P8" draw:layer="layout" draw:type="curve" svg:x1="10.798cm" svg:y1="70.539cm" svg:x2="12.202cm" svg:y2="69.162cm" draw:start-shape="id43" draw:start-glue-point="0" draw:end-shape="id8" draw:end-glue-point="5" svg:d="M10798 70539c0-918 468-1377 1404-1377" svg:viewBox="0 0 1405 1378">
          <text:p/>
        </draw:connector>
        <draw:connector draw:style-name="gr16" draw:text-style-name="P8" draw:layer="layout" draw:type="curve" svg:x1="13.32cm" svg:y1="70.279cm" svg:x2="15.318cm" svg:y2="71.158cm" draw:start-shape="id8" draw:start-glue-point="6" draw:end-shape="id7" draw:end-glue-point="8" svg:d="M13320 70279c0 660 1998 221 1998 879" svg:viewBox="0 0 1999 880">
          <text:p/>
        </draw:connector>
        <draw:connector draw:style-name="gr8" draw:text-style-name="P8" draw:layer="layout" draw:type="curve" svg:x1="13.119cm" svg:y1="65.802cm" svg:x2="13.66cm" svg:y2="68.044cm" draw:start-shape="id44" draw:start-glue-point="0" draw:end-shape="id8" draw:end-glue-point="0" svg:d="M13119 65802c0 1720 541 600 541 2242" svg:viewBox="0 0 542 2243">
          <text:p/>
        </draw:connector>
        <draw:connector draw:style-name="gr8" draw:text-style-name="P8" draw:layer="layout" draw:type="curve" draw:line-skew="0.289cm" svg:x1="9.177cm" svg:y1="65.802cm" svg:x2="8.243cm" svg:y2="68.044cm" draw:start-shape="id45" draw:start-glue-point="0" draw:end-shape="id46" draw:end-glue-point="0" svg:d="M9177 65802c0 2155-934 1035-934 2242" svg:viewBox="0 0 935 2243">
          <text:p/>
        </draw:connector>
        <draw:connector draw:style-name="gr9" draw:text-style-name="P8" draw:layer="layout" draw:type="curve" svg:x1="10.933cm" svg:y1="66.919cm" svg:x2="9.539cm" svg:y2="69.162cm" draw:start-shape="id47" draw:start-glue-point="6" draw:end-shape="id46" draw:end-glue-point="7" svg:d="M10933 66919c0 1496-464 2243-1394 2243" svg:viewBox="0 0 1395 2244">
          <text:p/>
        </draw:connector>
        <draw:connector draw:style-name="gr15" draw:text-style-name="P8" draw:layer="layout" draw:type="curve" svg:x1="8.065cm" svg:y1="70.279cm" svg:x2="8.904cm" svg:y2="71.9cm" draw:start-shape="id46" draw:start-glue-point="6" draw:end-shape="id43" draw:end-glue-point="5" svg:d="M8065 70279c0 1081 279 1621 839 1621" svg:viewBox="0 0 840 1622">
          <text:p/>
        </draw:connector>
        <draw:connector draw:style-name="gr9" draw:text-style-name="P8" draw:layer="layout" draw:type="curve" svg:x1="10.94cm" svg:y1="63.762cm" svg:x2="10.933cm" svg:y2="64.684cm" draw:start-shape="id42" draw:start-glue-point="6" draw:end-shape="id47" draw:end-glue-point="4" svg:d="M10940 63762c0 691-7 231-7 922" svg:viewBox="0 0 8 923">
          <text:p/>
        </draw:connector>
        <draw:connector draw:style-name="gr8" draw:text-style-name="P8" draw:layer="layout" draw:type="curve" draw:line-skew="0.352cm" svg:x1="12.979cm" svg:y1="62.853cm" svg:x2="11.224cm" svg:y2="64.684cm" draw:start-shape="id48" draw:start-glue-point="0" draw:end-shape="id47" draw:end-glue-point="0" svg:d="M12979 62853c0 1941-1755 1026-1755 1831" svg:viewBox="0 0 1756 1832">
          <text:p/>
        </draw:connector>
        <draw:connector draw:style-name="gr6" draw:text-style-name="P8" xml:id="id48" draw:id="id48" draw:layer="layout" draw:type="curve" svg:x1="12.533cm" svg:y1="62.853cm" svg:x2="13.346cm" svg:y2="62.854cm" draw:start-shape="id42" draw:start-glue-point="7" draw:end-shape="id49" draw:end-glue-point="5" svg:d="M12533 62853c649 0 243 1 813 1" svg:viewBox="0 0 814 2">
          <text:p/>
        </draw:connector>
        <draw:connector draw:style-name="gr8" draw:text-style-name="P8" draw:layer="layout" draw:type="curve" svg:x1="11.282cm" svg:y1="61.123cm" svg:x2="11.282cm" svg:y2="61.944cm" draw:start-shape="id41" draw:start-glue-point="2" draw:end-shape="id42" draw:end-glue-point="0" svg:d="M11282 61123v821" svg:viewBox="0 0 1 822">
          <text:p/>
        </draw:connector>
        <draw:connector draw:style-name="gr8" draw:text-style-name="P8" draw:layer="layout" draw:type="curve" svg:x1="11.033cm" svg:y1="52.154cm" svg:x2="11.11cm" svg:y2="52.844cm" draw:start-shape="id50" draw:start-glue-point="6" draw:end-shape="id51" draw:end-glue-point="0" svg:d="M11033 52154c0 517 77 173 77 690" svg:viewBox="0 0 78 691">
          <text:p/>
        </draw:connector>
        <draw:connector draw:style-name="gr9" draw:text-style-name="P8" draw:layer="layout" draw:type="curve" svg:x1="10.66cm" svg:y1="52.008cm" svg:x2="10.733cm" svg:y2="52.88cm" draw:start-shape="id50" draw:start-glue-point="9" draw:end-shape="id51" draw:end-glue-point="8" svg:d="M10660 52008c0 736 73 301 73 872" svg:viewBox="0 0 74 873">
          <text:p/>
        </draw:connector>
        <draw:connector draw:style-name="gr9" draw:text-style-name="P8" draw:layer="layout" draw:type="curve" svg:x1="10.972cm" svg:y1="55.079cm" svg:x2="10.972cm" svg:y2="55.843cm" draw:start-shape="id51" draw:start-glue-point="6" draw:end-shape="id52" draw:end-glue-point="4" svg:d="M10972 55079v764" svg:viewBox="0 0 1 765">
          <text:p/>
        </draw:connector>
        <draw:connector draw:style-name="gr9" draw:text-style-name="P8" draw:layer="layout" draw:type="curve" svg:x1="10.972cm" svg:y1="58.066cm" svg:x2="10.985cm" svg:y2="58.9cm" draw:start-shape="id52" draw:start-glue-point="6" draw:end-shape="id41" draw:end-glue-point="4" svg:d="M10972 58066c0 625 13 209 13 834" svg:viewBox="0 0 14 835">
          <text:p/>
        </draw:connector>
        <draw:connector draw:style-name="gr8" draw:text-style-name="P8" draw:layer="layout" draw:type="curve" draw:line-skew="0.368cm" svg:x1="12.941cm" svg:y1="44.174cm" svg:x2="11.156cm" svg:y2="45.758cm" draw:start-shape="id53" draw:start-glue-point="0" draw:end-shape="id54" draw:end-glue-point="4" svg:d="M12941 44174c0 1780-1785 989-1785 1584" svg:viewBox="0 0 1786 1585">
          <text:p/>
        </draw:connector>
        <draw:connector draw:style-name="gr8" draw:text-style-name="P8" draw:layer="layout" draw:type="curve" draw:line-skew="0.443cm" svg:x1="13.897cm" svg:y1="34.433cm" svg:x2="11.713cm" svg:y2="36.699cm" draw:start-shape="id55" draw:start-glue-point="0" draw:end-shape="id56" draw:end-glue-point="8" svg:d="M13897 34433c0 2407-2184 1275-2184 2266" svg:viewBox="0 0 2185 2267">
          <text:p/>
        </draw:connector>
        <draw:connector draw:style-name="gr6" draw:text-style-name="P8" xml:id="id55" draw:id="id55" draw:layer="layout" draw:type="curve" svg:x1="12.733cm" svg:y1="34.438cm" svg:x2="15.061cm" svg:y2="34.428cm" draw:start-shape="id57" draw:start-glue-point="7" draw:end-shape="id25" draw:end-glue-point="5" svg:d="M12733 34438c1746 0 582-10 2328-10" svg:viewBox="0 0 2329 11">
          <text:p/>
        </draw:connector>
        <draw:connector draw:style-name="gr9" draw:text-style-name="P8" draw:layer="layout" draw:type="curve" svg:x1="10.555cm" svg:y1="29.702cm" svg:x2="10.548cm" svg:y2="30.546cm" draw:start-shape="id58" draw:start-glue-point="6" draw:end-shape="id59" draw:end-glue-point="4" svg:d="M10555 29702c0 633-7 211-7 844" svg:viewBox="0 0 8 845">
          <text:p/>
        </draw:connector>
        <draw:connector draw:style-name="gr9" draw:text-style-name="P8" draw:layer="layout" draw:type="line" svg:x1="10.319cm" svg:y1="27.162cm" svg:x2="10.445cm" svg:y2="28.123cm" draw:start-shape="id60" draw:start-glue-point="6" draw:end-shape="id58" draw:end-glue-point="8" svg:d="M10319 27162l126 961" svg:viewBox="0 0 127 962">
          <text:p/>
        </draw:connector>
        <draw:connector draw:style-name="gr8" draw:text-style-name="P8" draw:layer="layout" draw:type="curve" draw:line-skew="0.849cm" svg:x1="13.038cm" svg:y1="47.175cm" svg:x2="11.033cm" svg:y2="49.614cm" draw:start-shape="id61" draw:start-glue-point="0" draw:end-shape="id50" draw:end-glue-point="4" svg:d="M13038 47175c0 3144-2005 1925-2005 2439" svg:viewBox="0 0 2006 2440">
          <text:p/>
        </draw:connector>
        <draw:connector draw:style-name="gr9" draw:text-style-name="P8" draw:layer="layout" draw:type="curve" svg:x1="10.763cm" svg:y1="48.922cm" svg:x2="10.608cm" svg:y2="49.614cm" draw:start-shape="id54" draw:start-glue-point="9" draw:end-shape="id50" draw:end-glue-point="8" svg:d="M10763 48922c0 520-155 175-155 692" svg:viewBox="0 0 156 693">
          <text:p/>
        </draw:connector>
        <draw:connector draw:style-name="gr9" draw:text-style-name="P8" draw:layer="layout" draw:type="curve" svg:x1="10.81cm" svg:y1="44.979cm" svg:x2="10.667cm" svg:y2="45.758cm" draw:start-shape="id62" draw:start-glue-point="6" draw:end-shape="id54" draw:end-glue-point="8" svg:d="M10810 44979c0 585-143 196-143 779" svg:viewBox="0 0 144 780">
          <text:p/>
        </draw:connector>
        <draw:connector draw:style-name="gr9" draw:text-style-name="P8" draw:layer="layout" draw:type="curve" svg:x1="10.808cm" svg:y1="42.369cm" svg:x2="10.81cm" svg:y2="43.372cm" draw:start-shape="id63" draw:start-glue-point="6" draw:end-shape="id62" draw:end-glue-point="4" svg:d="M10808 42369c0 751 2 250 2 1003" svg:viewBox="0 0 3 1004">
          <text:p/>
        </draw:connector>
        <draw:connector draw:style-name="gr8" draw:text-style-name="P8" draw:layer="layout" draw:type="curve" draw:line-skew="0.34cm" svg:x1="13.042cm" svg:y1="41.303cm" svg:x2="11.263cm" svg:y2="43.372cm" draw:start-shape="id64" draw:start-glue-point="0" draw:end-shape="id62" draw:end-glue-point="0" svg:d="M13042 41303c0 2103-1779 1069-1779 2069" svg:viewBox="0 0 1780 2070">
          <text:p/>
        </draw:connector>
        <draw:connector draw:style-name="gr6" draw:text-style-name="P8" xml:id="id64" draw:id="id64" draw:layer="layout" draw:type="curve" svg:x1="13.435cm" svg:y1="41.305cm" svg:x2="12.569cm" svg:y2="41.301cm" draw:start-shape="id65" draw:start-glue-point="5" draw:end-shape="id63" draw:end-glue-point="7" svg:d="M13435 41305c-609 0-176-4-866-4" svg:viewBox="0 0 867 5">
          <text:p/>
        </draw:connector>
        <draw:connector draw:style-name="gr9" draw:text-style-name="P8" draw:layer="layout" draw:type="curve" draw:line-skew="0.867cm" svg:x1="16.648cm" svg:y1="35.221cm" svg:x2="12.348cm" svg:y2="40.232cm" draw:start-shape="id25" draw:start-glue-point="2" draw:end-shape="id63" draw:end-glue-point="8" svg:d="M16648 35221c0 5058-4300 2553-4300 5011" svg:viewBox="0 0 4301 5012">
          <text:p/>
        </draw:connector>
        <draw:connector draw:style-name="gr9" draw:text-style-name="P8" draw:layer="layout" draw:type="curve" svg:x1="12.484cm" svg:y1="38.03cm" svg:x2="15.855cm" svg:y2="35.221cm" draw:start-shape="id56" draw:start-glue-point="7" draw:end-shape="id25" draw:end-glue-point="6" svg:d="M12484 38030c2248 0 3371-936 3371-2809" svg:viewBox="0 0 3372 2810">
          <text:p/>
        </draw:connector>
        <draw:connector draw:style-name="gr9" draw:text-style-name="P8" draw:layer="layout" draw:type="line" svg:x1="11.157cm" svg:y1="35.647cm" svg:x2="11.153cm" svg:y2="36.699cm" draw:start-shape="id57" draw:start-glue-point="2" draw:end-shape="id56" draw:end-glue-point="0" svg:d="M11157 35647l-4 1052" svg:viewBox="0 0 5 1053">
          <text:p/>
        </draw:connector>
        <draw:connector draw:style-name="gr9" draw:text-style-name="P8" draw:layer="layout" draw:type="line" svg:x1="10.548cm" svg:y1="32.477cm" svg:x2="10.792cm" svg:y2="33.228cm" draw:start-shape="id59" draw:start-glue-point="6" draw:end-shape="id57" draw:end-glue-point="4" svg:d="M10548 32477l244 751" svg:viewBox="0 0 245 752">
          <text:p/>
        </draw:connector>
        <draw:connector draw:style-name="gr8" draw:text-style-name="P8" draw:layer="layout" draw:type="curve" draw:line-skew="0.251cm" svg:x1="12.773cm" svg:y1="28.911cm" svg:x2="11.156cm" svg:y2="30.546cm" draw:start-shape="id66" draw:start-glue-point="0" draw:end-shape="id59" draw:end-glue-point="0" svg:d="M12773 28911c0 1642-1617 825-1617 1635" svg:viewBox="0 0 1618 1636">
          <text:p/>
        </draw:connector>
        <draw:connector draw:style-name="gr8" draw:text-style-name="P8" draw:layer="layout" draw:type="curve" svg:x1="11.156cm" svg:y1="32.477cm" svg:x2="11.157cm" svg:y2="33.228cm" draw:start-shape="id59" draw:start-glue-point="2" draw:end-shape="id57" draw:end-glue-point="0" svg:d="M11156 32477c0 562 1 187 1 751" svg:viewBox="0 0 2 752">
          <text:p/>
        </draw:connector>
        <draw:connector draw:style-name="gr9" draw:text-style-name="P8" draw:layer="layout" draw:type="line" svg:x1="10.726cm" svg:y1="19.732cm" svg:x2="10.739cm" svg:y2="20.689cm" draw:start-shape="id37" draw:start-glue-point="6" draw:end-shape="id35" draw:end-glue-point="4" svg:d="M10726 19732l13 957" svg:viewBox="0 0 14 958">
          <text:p/>
        </draw:connector>
        <draw:connector draw:style-name="gr9" draw:text-style-name="P8" draw:layer="layout" draw:type="curve" svg:x1="8.76cm" svg:y1="13.377cm" svg:x2="9.408cm" svg:y2="15.356cm" draw:start-shape="id40" draw:start-glue-point="2" draw:end-shape="id67" draw:end-glue-point="5" svg:d="M8760 13377c0 1320 216 1979 648 1979" svg:viewBox="0 0 649 1980">
          <text:p/>
        </draw:connector>
        <draw:connector draw:style-name="gr8" draw:text-style-name="P8" draw:layer="layout" draw:type="curve" draw:line-skew="0.493cm" svg:x1="12.718cm" svg:y1="15.353cm" svg:x2="11.374cm" svg:y2="17.497cm" draw:start-shape="id68" draw:start-glue-point="0" draw:end-shape="id37" draw:end-glue-point="8" svg:d="M12718 15353c0 2389-1344 1318-1344 2144" svg:viewBox="0 0 1345 2145">
          <text:p/>
        </draw:connector>
        <draw:connector draw:style-name="gr6" draw:text-style-name="P8" xml:id="id68" draw:id="id68" draw:layer="layout" draw:type="line" svg:x1="13.199cm" svg:y1="15.35cm" svg:x2="12.238cm" svg:y2="15.356cm" draw:start-shape="id69" draw:start-glue-point="5" draw:end-shape="id67" draw:end-glue-point="7" svg:d="M13199 15350l-961 6" svg:viewBox="0 0 962 7">
          <text:p/>
        </draw:connector>
        <draw:connector draw:style-name="gr1" draw:text-style-name="P8" draw:layer="layout" svg:x1="8.766cm" svg:y1="3.328cm" svg:x2="8.765cm" svg:y2="4.569cm" draw:start-shape="id70" draw:start-glue-point="0" draw:end-shape="id71" draw:end-glue-point="0" svg:d="M8766 3328v673h-1v568" svg:viewBox="0 0 2 1242">
          <text:p/>
        </draw:connector>
        <draw:connector draw:style-name="gr15" draw:text-style-name="P8" draw:layer="layout" draw:type="curve" svg:x1="14.112cm" svg:y1="74.249cm" svg:x2="10.407cm" svg:y2="74.924cm" draw:start-shape="id7" draw:start-glue-point="9" draw:end-shape="id72" draw:end-glue-point="4" svg:d="M14112 74249c-2470 0-3705 225-3705 675" svg:viewBox="0 0 3706 676">
          <text:p/>
        </draw:connector>
        <draw:connector draw:style-name="gr15" draw:text-style-name="P8" draw:layer="layout" draw:type="curve" draw:line-skew="0.428cm" svg:x1="10.171cm" svg:y1="74.924cm" svg:x2="4.803cm" svg:y2="70.279cm" draw:start-shape="id72" draw:start-glue-point="12" draw:end-shape="id73" draw:end-glue-point="2" svg:d="M10171 74924c0-2841-5368-519-5368-4645" svg:viewBox="0 0 5369 4646">
          <text:p/>
        </draw:connector>
        <draw:connector draw:style-name="gr15" draw:text-style-name="P8" draw:layer="layout" draw:type="curve" svg:x1="4.465cm" svg:y1="70.279cm" svg:x2="8.908cm" svg:y2="77.308cm" draw:start-shape="id73" draw:start-glue-point="6" draw:end-shape="id72" draw:end-glue-point="9" svg:d="M4465 70279c0 4686 1481 7029 4443 7029" svg:viewBox="0 0 4444 7030">
          <text:p/>
        </draw:connector>
        <draw:connector draw:style-name="gr15" draw:text-style-name="P8" draw:layer="layout" draw:type="curve" svg:x1="13.777cm" svg:y1="77.163cm" svg:x2="15.382cm" svg:y2="77.163cm" draw:start-shape="id72" draw:start-glue-point="10" draw:end-shape="id74" draw:end-glue-point="5" svg:d="M13777 77163h1605" svg:viewBox="0 0 1606 1">
          <text:p/>
        </draw:connector>
        <draw:connector draw:style-name="gr8" draw:text-style-name="P8" draw:layer="layout" draw:type="curve" svg:x1="8.761cm" svg:y1="10.721cm" svg:x2="8.76cm" svg:y2="11.291cm" draw:start-shape="id11" draw:start-glue-point="2" draw:end-shape="id40" draw:end-glue-point="0" svg:d="M8761 10721c0 427-1 143-1 570" svg:viewBox="0 0 2 571">
          <text:p/>
        </draw:connector>
        <draw:connector draw:style-name="gr8" draw:text-style-name="P8" draw:layer="layout" draw:type="curve" svg:x1="8.762cm" svg:y1="8.456cm" svg:x2="8.761cm" svg:y2="9.032cm" draw:start-shape="id75" draw:start-glue-point="2" draw:end-shape="id11" draw:end-glue-point="0" svg:d="M8762 8456c0 393-1 105-1 576" svg:viewBox="0 0 2 577">
          <text:p/>
        </draw:connector>
        <draw:connector draw:style-name="gr9" draw:text-style-name="P8" draw:layer="layout" draw:type="curve" svg:x1="16.341cm" svg:y1="78.122cm" svg:x2="13.153cm" svg:y2="79.868cm" draw:start-shape="id74" draw:start-glue-point="6" draw:end-shape="id76" draw:end-glue-point="7" svg:d="M16341 78122c0 1164-1062 1746-3188 1746" svg:viewBox="0 0 3189 1747">
          <text:p/>
        </draw:connector>
        <draw:connector draw:style-name="gr8" draw:text-style-name="P8" draw:layer="layout" draw:type="curve" draw:line-skew="0.289cm" svg:x1="4.803cm" svg:y1="68.044cm" svg:x2="9.177cm" svg:y2="65.802cm" draw:start-shape="id73" draw:start-glue-point="0" draw:end-shape="id45" draw:end-glue-point="0" svg:d="M4803 68044c0-1207 4374-87 4374-2242" svg:viewBox="0 0 4375 2243">
          <text:p/>
        </draw:connector>
        <draw:connector draw:style-name="gr8" draw:text-style-name="P8" draw:layer="layout" draw:type="curve" draw:line-skew="0.593cm" svg:x1="12.886cm" svg:y1="56.952cm" svg:x2="11.282cm" svg:y2="58.9cm" draw:start-shape="id77" draw:start-glue-point="0" draw:end-shape="id41" draw:end-glue-point="0" svg:d="M12886 56952c0 2392-1604 1419-1604 1948" svg:viewBox="0 0 1605 1949">
          <text:p/>
        </draw:connector>
        <draw:connector draw:style-name="gr8" draw:text-style-name="P8" draw:layer="layout" draw:type="curve" svg:x1="11.153cm" svg:y1="39.557cm" svg:x2="11.154cm" svg:y2="40.232cm" draw:start-shape="id56" draw:start-glue-point="2" draw:end-shape="id63" draw:end-glue-point="0" svg:d="M11153 39557c0 507 1 170 1 675" svg:viewBox="0 0 2 676">
          <text:p/>
        </draw:connector>
        <draw:connector draw:style-name="gr6" draw:text-style-name="P8" xml:id="id53" draw:id="id53" draw:layer="layout" draw:type="curve" svg:x1="13.287cm" svg:y1="44.174cm" svg:x2="12.52cm" svg:y2="44.175cm" draw:start-shape="id78" draw:start-glue-point="5" draw:end-shape="id62" draw:end-glue-point="7" svg:d="M13287 44174c-537 0-154 1-767 1" svg:viewBox="0 0 768 2">
          <text:p/>
        </draw:connector>
        <draw:connector draw:style-name="gr6" draw:text-style-name="P8" xml:id="id61" draw:id="id61" draw:layer="layout" draw:type="curve" svg:x1="13.427cm" svg:y1="47.177cm" svg:x2="12.571cm" svg:y2="47.173cm" draw:start-shape="id79" draw:start-glue-point="5" draw:end-shape="id54" draw:end-glue-point="7" svg:d="M13427 47177c-603 0-175-4-856-4" svg:viewBox="0 0 857 5">
          <text:p/>
        </draw:connector>
        <draw:custom-shape draw:style-name="gr17" draw:text-style-name="P10" xml:id="id11" draw:id="id11" draw:layer="layout" svg:width="3.469cm" svg:height="1.689cm" svg:x="7.027cm" svg:y="9.032cm">
          <draw:glue-point draw:id="8" svg:x="5.115cm" svg:y="-1.897cm"/>
          <draw:glue-point draw:id="9" svg:x="5.115cm" svg:y="2.366cm"/>
          <text:p text:style-name="P9"><text:span text:style-name="T5">Saul</text:span></text:p>
          <text:p text:style-name="P9"><text:span text:style-name="T6">1Sa 9:2</text:span></text:p>
          <text:p text:style-name="P9"><text:span text:style-name="T6">1Ch 8:33, 9:39</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8" draw:text-style-name="P10" xml:id="id67" draw:id="id67" draw:layer="layout" svg:width="2.83cm" svg:height="2.235cm" svg:x="9.408cm" svg:y="14.238cm">
          <draw:glue-point draw:id="8" svg:x="2.77cm" svg:y="-5.239cm"/>
          <draw:glue-point draw:id="9" svg:x="-0.293cm" svg:y="5.243cm"/>
          <text:p text:style-name="P9"><text:span text:style-name="T5">David</text:span></text:p>
          <text:p text:style-name="P9"><text:span text:style-name="T6">1Sa 16:1</text:span></text:p>
          <text:p text:style-name="P9"><text:span text:style-name="T6">2Sa 2:4,11</text:span></text:p>
          <text:p text:style-name="P9"><text:span text:style-name="T6">2Sa 5:3</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9" draw:text-style-name="P10" xml:id="id40" draw:id="id40" draw:layer="layout" svg:width="3.461cm" svg:height="2.086cm" svg:x="7.03cm" svg:y="11.291cm">
          <text:p text:style-name="P9"><text:span text:style-name="T5">Ishbosheth</text:span></text:p>
          <text:p text:style-name="P9"><text:span text:style-name="T7">2Sa 2:8</text:span></text:p>
          <text:p text:style-name="P9"><text:span text:style-name="T5">Esh-baal</text:span></text:p>
          <text:p text:style-name="P9"><text:span text:style-name="T8">1Ch 8:33, 9:39</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20" draw:text-style-name="P12" xml:id="id31" draw:id="id31" draw:layer="layout" svg:width="2.819cm" svg:height="1.524cm" svg:x="20.807cm" svg:y="17.876cm">
          <text:p text:style-name="P11"><text:span text:style-name="T9">Jeroboam</text:span></text:p>
          <text:p text:style-name="P11"><text:span text:style-name="T10">1Ki 12:20</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21" draw:text-style-name="P10" xml:id="id37" draw:id="id37" draw:layer="layout" svg:width="2.513cm" svg:height="2.235cm" svg:x="9.608cm" svg:y="17.497cm">
          <draw:glue-point draw:id="8" svg:x="2.033cm" svg:y="-5.239cm"/>
          <text:p text:style-name="P9"><text:span text:style-name="T11">Solomon</text:span></text:p>
          <text:p text:style-name="P9"><text:span text:style-name="T8">2Sa 12:24</text:span></text:p>
          <text:p text:style-name="P9"><text:span text:style-name="T5">Jedidiah</text:span></text:p>
          <text:p text:style-name="P9"><text:span text:style-name="T8">2Sa 12:25</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22" draw:text-style-name="P13" xml:id="id91" draw:id="id91" draw:layer="layout" svg:width="2.671cm" svg:height="1.905cm" svg:x="13.273cm" svg:y="20.852cm">
          <text:p text:style-name="P9"><text:span text:style-name="T11">Maachah</text:span></text:p>
          <text:p text:style-name="P9"><text:span text:style-name="T12">2Ch 11:21</text:span></text:p>
          <text:p text:style-name="P9"><text:span text:style-name="T13">Michaiah</text:span></text:p>
          <text:p text:style-name="P9"><text:span text:style-name="T8">2Ch 13:2</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23" draw:text-style-name="P13" xml:id="id69" draw:id="id69" draw:layer="layout" svg:width="2.984cm" svg:height="2.223cm" svg:x="13.199cm" svg:y="14.238cm">
          <text:p text:style-name="P9"><text:span text:style-name="T5">Bath-sheba</text:span></text:p>
          <text:p text:style-name="P9"><text:span text:style-name="T8">2Sa 12:24</text:span></text:p>
          <text:p text:style-name="P9"><text:span text:style-name="T5">Bath-shua</text:span></text:p>
          <text:p text:style-name="P9"><text:span text:style-name="T8">1Ch 3:5</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24" draw:text-style-name="P13" xml:id="id38" draw:id="id38" draw:layer="layout" svg:width="2.54cm" svg:height="1.687cm" svg:x="13.361cm" svg:y="17.771cm">
          <text:p text:style-name="P9"><text:span text:style-name="T5">Naamah</text:span></text:p>
          <text:p text:style-name="P9"><text:span text:style-name="T14">1Ki 14:2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8" draw:text-style-name="P8" draw:layer="layout" draw:type="curve" draw:line-skew="0.55cm" svg:x1="12.902cm" svg:y1="21.806cm" svg:x2="11.019cm" svg:y2="24.304cm" draw:start-shape="id80" draw:start-glue-point="0" draw:end-shape="id60" draw:end-glue-point="0" svg:d="M12902 21806c0 2739-1883 1490-1883 2498" svg:viewBox="0 0 1884 2499">
          <text:p/>
        </draw:connector>
        <draw:connector draw:style-name="gr9" draw:text-style-name="P8" draw:layer="layout" draw:type="curve" svg:x1="10.739cm" svg:y1="22.924cm" svg:x2="10.741cm" svg:y2="24.304cm" draw:start-shape="id35" draw:start-glue-point="6" draw:end-shape="id60" draw:end-glue-point="8" svg:d="M10739 22924c0 1035 2 345 2 1380" svg:viewBox="0 0 3 1381">
          <text:p/>
        </draw:connector>
        <draw:custom-shape draw:style-name="gr25" draw:text-style-name="P15" xml:id="id59" draw:id="id59" draw:layer="layout" svg:width="3.148cm" svg:height="1.931cm" svg:x="9.582cm" svg:y="30.546cm">
          <text:p text:style-name="P14"><text:span text:style-name="T15">Jehoshaphat</text:span></text:p>
          <text:p text:style-name="P14"><text:span text:style-name="T12">1Ki 15:24</text:span></text:p>
          <text:p text:style-name="P14"><text:span text:style-name="T15">Josaphat</text:span></text:p>
          <text:p text:style-name="P14"><text:span text:style-name="T12">Mat 1:8</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26" draw:text-style-name="P17" xml:id="id57" draw:id="id57" draw:layer="layout" svg:width="3.151cm" svg:height="2.419cm" svg:x="9.582cm" svg:y="33.228cm">
          <text:p text:style-name="P16"><text:span text:style-name="T15">Jehoram</text:span></text:p>
          <text:p text:style-name="P16"><text:span text:style-name="T12">1Ki 22:50</text:span></text:p>
          <text:p text:style-name="P16"><text:span text:style-name="T15">Joram</text:span></text:p>
          <text:p text:style-name="P16"><text:span text:style-name="T12">2Ki 8:16-24</text:span></text:p>
          <text:p text:style-name="P16"><text:span text:style-name="T12">Mat 1:8</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27" draw:text-style-name="P17" xml:id="id56" draw:id="id56" draw:layer="layout" svg:width="2.662cm" svg:height="2.858cm" svg:x="9.822cm" svg:y="36.699cm">
          <draw:glue-point draw:id="8" svg:x="2.107cm" svg:y="-5.041cm"/>
          <text:p text:style-name="P16"><text:span text:style-name="T15">Ahaziah</text:span></text:p>
          <text:p text:style-name="P16"><text:span text:style-name="T12">2Ki 8:24</text:span></text:p>
          <text:p text:style-name="P16"><text:span text:style-name="T15">Jehoahaz</text:span></text:p>
          <text:p text:style-name="P16"><text:span text:style-name="T12">2Ch 21:17</text:span></text:p>
          <text:p text:style-name="P16"><text:span text:style-name="T15">Azariah</text:span></text:p>
          <text:p text:style-name="P16"><text:span text:style-name="T12">2Ch 22:6</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8" draw:text-style-name="P8" draw:layer="layout" draw:type="curve" svg:x1="22.215cm" svg:y1="27.32cm" svg:x2="21.851cm" svg:y2="29.412cm" draw:start-shape="id27" draw:start-glue-point="2" draw:end-shape="id81" draw:end-glue-point="0" svg:d="M22215 27320c0 1569-364 523-364 2092" svg:viewBox="0 0 365 2093">
          <text:p/>
        </draw:connector>
        <draw:custom-shape draw:style-name="gr28" draw:text-style-name="P13" xml:id="id82" draw:id="id82" draw:layer="layout" svg:width="2.445cm" svg:height="1.27cm" svg:x="17.362cm" svg:y="29.531cm">
          <text:p text:style-name="P9"><text:span text:style-name="T13">Jezebel</text:span></text:p>
          <text:p text:style-name="P9"><text:span text:style-name="T8">1Ki 16:3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6" draw:text-style-name="P8" xml:id="id24" draw:id="id24" draw:layer="layout" draw:type="curve" svg:x1="20.66cm" svg:y1="30.166cm" svg:x2="19.807cm" svg:y2="30.166cm" draw:start-shape="id81" draw:start-glue-point="5" draw:end-shape="id82" draw:end-glue-point="7" svg:d="M20660 30166h-853" svg:viewBox="0 0 854 1">
          <text:p/>
        </draw:connector>
        <draw:connector draw:style-name="gr9" draw:text-style-name="P8" draw:layer="layout" draw:type="curve" svg:x1="21.479cm" svg:y1="27.32cm" svg:x2="21.414cm" svg:y2="29.412cm" draw:start-shape="id27" draw:start-glue-point="6" draw:end-shape="id81" draw:end-glue-point="4" svg:d="M21479 27320c0 1569-65 523-65 2092" svg:viewBox="0 0 66 2093">
          <text:p/>
        </draw:connector>
        <draw:custom-shape draw:style-name="gr29" draw:text-style-name="P17" xml:id="id63" draw:id="id63" draw:layer="layout" svg:width="2.83cm" svg:height="2.137cm" svg:x="9.739cm" svg:y="40.232cm">
          <draw:glue-point draw:id="8" svg:x="4.222cm" svg:y="-5.245cm"/>
          <text:p text:style-name="P16"><text:span text:style-name="T15">Joash</text:span></text:p>
          <text:p text:style-name="P16"><text:span text:style-name="T12">2Ki 13:1</text:span></text:p>
          <text:p text:style-name="P16"><text:span text:style-name="T15">Jehoash</text:span></text:p>
          <text:p text:style-name="P16"><text:span text:style-name="T12">2Ki 11:2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30" draw:text-style-name="P19" xml:id="id62" draw:id="id62" draw:layer="layout" svg:width="2.513cm" svg:height="1.607cm" svg:x="10.007cm" svg:y="43.372cm">
          <text:p text:style-name="P18"><text:span text:style-name="T15">Amaziah</text:span></text:p>
          <text:p text:style-name="P18"><text:span text:style-name="T16">2Ki 12:2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31" draw:text-style-name="P13" xml:id="id65" draw:id="id65" draw:layer="layout" svg:width="2.65cm" svg:height="1.27cm" svg:x="13.435cm" svg:y="40.67cm">
          <text:p text:style-name="P9"><text:span text:style-name="T13">Jehoaddan</text:span></text:p>
          <text:p text:style-name="P9"><text:span text:style-name="T8">2Ki 14:1,2</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32" draw:text-style-name="P17" xml:id="id54" draw:id="id54" draw:layer="layout" svg:width="2.83cm" svg:height="3.164cm" svg:x="9.741cm" svg:y="45.758cm">
          <draw:glue-point draw:id="8" svg:x="-1.731cm" svg:y="-5cm"/>
          <draw:glue-point draw:id="9" svg:x="-1.392cm" svg:y="5.188cm"/>
          <text:p text:style-name="P16"><text:span text:style-name="T15">Azariah</text:span></text:p>
          <text:p text:style-name="P16"><text:span text:style-name="T12">2Ki 14:21</text:span></text:p>
          <text:p text:style-name="P16"><text:span text:style-name="T15">Uzziah</text:span></text:p>
          <text:p text:style-name="P16"><text:span text:style-name="T12">2Ch 26:1</text:span></text:p>
          <text:p text:style-name="P16"><text:span text:style-name="T15">Ozias</text:span></text:p>
          <text:p text:style-name="P16"><text:span text:style-name="T12">Mat 1:8,9</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33" draw:text-style-name="P13" xml:id="id78" draw:id="id78" draw:layer="layout" svg:width="2.635cm" svg:height="1.432cm" svg:x="13.287cm" svg:y="43.458cm">
          <text:p text:style-name="P9"><text:span text:style-name="T13">Jecholiah</text:span></text:p>
          <text:p text:style-name="P9"><text:span text:style-name="T8">2Ki 15:1,2</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34" draw:text-style-name="P19" xml:id="id50" draw:id="id50" draw:layer="layout" svg:width="2.735cm" svg:height="2.54cm" svg:x="9.763cm" svg:y="49.614cm">
          <draw:glue-point draw:id="8" svg:x="-1.91cm" svg:y="-5.239cm"/>
          <draw:glue-point draw:id="9" svg:x="-1.719cm" svg:y="4.429cm"/>
          <text:p text:style-name="P18"><text:span text:style-name="T15">Jotham</text:span></text:p>
          <text:p text:style-name="P18"><text:span text:style-name="T16">2Ki 15:7</text:span></text:p>
          <text:p text:style-name="P18"><text:span text:style-name="T15">Joatham</text:span></text:p>
          <text:p text:style-name="P18"><text:span text:style-name="T12">Mt 1:9</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35" draw:text-style-name="P20" xml:id="id79" draw:id="id79" draw:layer="layout" svg:width="3.139cm" svg:height="2.025cm" svg:x="13.427cm" svg:y="46.164cm">
          <text:p text:style-name="P14"><text:span text:style-name="T15">Jerusha</text:span></text:p>
          <text:p text:style-name="P14"><text:span text:style-name="T8">2Ki 15:32,33</text:span></text:p>
          <text:p text:style-name="P14"><text:span text:style-name="T13">Jerushah</text:span></text:p>
          <text:p text:style-name="P14"><text:span text:style-name="T8">2Ch 27: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36" draw:text-style-name="P13" xml:id="id83" draw:id="id83" draw:layer="layout" svg:width="2.693cm" svg:height="1.492cm" svg:x="13.199cm" svg:y="28.164cm">
          <text:p text:style-name="P9"><text:span text:style-name="T13">Azubah</text:span></text:p>
          <text:p text:style-name="P9"><text:span text:style-name="T7">1Ki 22:42</text:span></text:p>
          <text:p text:style-name="P9"><text:span text:style-name="T7">2Ch 20:3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6" draw:text-style-name="P8" xml:id="id66" draw:id="id66" draw:layer="layout" draw:type="curve" svg:x1="13.199cm" svg:y1="28.91cm" svg:x2="12.269cm" svg:y2="28.912cm" draw:start-shape="id83" draw:start-glue-point="5" draw:end-shape="id58" draw:end-glue-point="7" svg:d="M13199 28910c-658 0-194 2-930 2" svg:viewBox="0 0 931 3">
          <text:p/>
        </draw:connector>
        <draw:connector draw:style-name="gr9" draw:text-style-name="P8" draw:layer="layout" draw:type="curve" svg:x1="23.042cm" svg:y1="30.166cm" svg:x2="24.109cm" svg:y2="33.639cm" draw:start-shape="id81" draw:start-glue-point="7" draw:end-shape="id12" draw:end-glue-point="8" svg:d="M23042 30166c712 0 1067 1157 1067 3473" svg:viewBox="0 0 1068 3474">
          <text:p/>
        </draw:connector>
        <draw:connector draw:style-name="gr8" draw:text-style-name="P8" draw:layer="layout" draw:type="curve" svg:x1="11.019cm" svg:y1="27.162cm" svg:x2="11.017cm" svg:y2="28.123cm" draw:start-shape="id60" draw:start-glue-point="2" draw:end-shape="id58" draw:end-glue-point="0" svg:d="M11019 27162c0 721-2 241-2 961" svg:viewBox="0 0 3 962">
          <text:p/>
        </draw:connector>
        <draw:custom-shape draw:style-name="gr37" draw:text-style-name="P17" xml:id="id51" draw:id="id51" draw:layer="layout" svg:width="2.513cm" svg:height="2.235cm" svg:x="9.854cm" svg:y="52.844cm">
          <draw:glue-point draw:id="8" svg:x="-1.504cm" svg:y="-4.841cm"/>
          <text:p text:style-name="P16"><text:span text:style-name="T15">Ahaz</text:span></text:p>
          <text:p text:style-name="P16"><text:span text:style-name="T16">2Ki 15:38</text:span></text:p>
          <text:p text:style-name="P16"><text:span text:style-name="T15">Achaz</text:span></text:p>
          <text:p text:style-name="P16"><text:span text:style-name="T12">Mt 1:9</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38" draw:text-style-name="P19" xml:id="id75" draw:id="id75" draw:layer="layout" svg:width="3.3cm" svg:height="1.464cm" svg:x="7.112cm" svg:y="6.992cm">
          <text:p text:style-name="P18"><text:span text:style-name="T17">Kish</text:span></text:p>
          <text:p text:style-name="P18"><text:span text:style-name="T18">1Ch 8:33, 9:39</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39" draw:text-style-name="P22" xml:id="id71" draw:id="id71" draw:layer="layout" svg:width="3.062cm" svg:height="1.587cm" svg:x="7.234cm" svg:y="4.569cm">
          <text:p text:style-name="P21"><text:span text:style-name="T17">Ner</text:span></text:p>
          <text:p text:style-name="P21"><text:span text:style-name="T18">1Sa 14:50,51</text:span></text:p>
          <text:p text:style-name="P21"><text:span text:style-name="T18">1Ch 9:35-39</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40" draw:text-style-name="P22" xml:id="id88" draw:id="id88" draw:layer="layout" svg:width="3.11cm" svg:height="1.257cm" svg:x="9.029cm" svg:y="2.699cm">
          <text:p text:style-name="P21"><text:span text:style-name="T17">Jehiel</text:span></text:p>
          <text:p text:style-name="P21"><text:span text:style-name="T18">1Ch 8:29, 9:35</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41" draw:text-style-name="P24" xml:id="id87" draw:id="id87" draw:layer="layout" svg:width="3.068cm" svg:height="1.257cm" svg:x="5.436cm" svg:y="2.699cm">
          <text:p text:style-name="P23"><text:span text:style-name="T17">Maachah</text:span></text:p>
          <text:p text:style-name="P23"><text:span text:style-name="T18">1Ch 8:29, 9:35</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8" draw:text-style-name="P8" draw:layer="layout" draw:type="curve" svg:x1="8.765cm" svg:y1="6.156cm" svg:x2="8.762cm" svg:y2="6.992cm" draw:start-shape="id71" draw:start-glue-point="2" draw:end-shape="id75" draw:end-glue-point="0" svg:d="M8765 6156c0 627-3 209-3 836" svg:viewBox="0 0 4 837">
          <text:p/>
        </draw:connector>
        <draw:custom-shape draw:style-name="gr42" draw:text-style-name="P22" xml:id="id39" draw:id="id39" draw:layer="layout" svg:width="3.062cm" svg:height="1.473cm" svg:x="2.989cm" svg:y="6.992cm">
          <text:p text:style-name="P21"><text:span text:style-name="T17">Abner</text:span></text:p>
          <text:p text:style-name="P21"><text:span text:style-name="T18">1Sa 14:50,51</text:span></text:p>
          <text:p text:style-name="P21"><text:span text:style-name="T18">2Sa 2:8,9</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8" draw:text-style-name="P8" draw:layer="layout" draw:type="curve" draw:line-skew="0.021cm 0cm 0.202cm" svg:x1="8.765cm" svg:y1="6.156cm" svg:x2="4.52cm" svg:y2="6.992cm" draw:start-shape="id71" draw:start-glue-point="2" draw:end-shape="id39" draw:end-glue-point="0" svg:d="M8765 6156c0 261-531 522-1061 522-531 0-1061 4-1061 7 0 4-531 7-1062 7-530 0-1061 150-1061 300" svg:viewBox="0 0 4246 837">
          <text:p/>
        </draw:connector>
        <draw:connector draw:style-name="gr15" draw:text-style-name="P8" draw:layer="layout" draw:type="curve" svg:x1="7.027cm" svg:y1="9.877cm" svg:x2="4.52cm" svg:y2="8.465cm" draw:start-shape="id11" draw:start-glue-point="5" draw:end-shape="id39" draw:end-glue-point="2" svg:d="M7027 9877c-1672 0-2507-470-2507-1412" svg:viewBox="0 0 2508 1413">
          <text:p/>
        </draw:connector>
        <draw:custom-shape draw:style-name="gr43" draw:text-style-name="P26" xml:id="id52" draw:id="id52" draw:layer="layout" svg:width="2.502cm" svg:height="2.223cm" svg:x="9.861cm" svg:y="55.843cm">
          <text:p text:style-name="P25"><text:span text:style-name="T15">Hezekiah</text:span></text:p>
          <text:p text:style-name="P25"><text:span text:style-name="T16">2Ki 16:20</text:span></text:p>
          <text:p text:style-name="P25"><text:span text:style-name="T15">Ezekias</text:span></text:p>
          <text:p text:style-name="P25"><text:span text:style-name="T12">Mt 1:9,1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44" draw:text-style-name="P19" xml:id="id41" draw:id="id41" draw:layer="layout" svg:width="2.819cm" svg:height="2.223cm" svg:x="9.873cm" svg:y="58.9cm">
          <text:p text:style-name="P18"><text:span text:style-name="T15">Manasseh</text:span></text:p>
          <text:p text:style-name="P18"><text:span text:style-name="T16">2Ki 20:21</text:span></text:p>
          <text:p text:style-name="P18"><text:span text:style-name="T15">Manasses</text:span></text:p>
          <text:p text:style-name="P18"><text:span text:style-name="T12">Mt 1:1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45" draw:text-style-name="P19" xml:id="id42" draw:id="id42" draw:layer="layout" svg:width="2.502cm" svg:height="1.818cm" svg:x="10.031cm" svg:y="61.944cm">
          <text:p text:style-name="P18"><text:span text:style-name="T15">Amon</text:span></text:p>
          <text:p text:style-name="P18"><text:span text:style-name="T16">2Ki 21:18</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46" draw:text-style-name="P19" xml:id="id47" draw:id="id47" draw:layer="layout" svg:width="2.819cm" svg:height="2.235cm" svg:x="9.815cm" svg:y="64.684cm">
          <text:p text:style-name="P18"><text:span text:style-name="T11">Josiah</text:span></text:p>
          <text:p text:style-name="P18"><text:span text:style-name="T19">2Ki 21:24</text:span></text:p>
          <text:p text:style-name="P18"><text:span text:style-name="T11">Josias</text:span></text:p>
          <text:p text:style-name="P18"><text:span text:style-name="T12">Mt 1:10,1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47" draw:text-style-name="P19" xml:id="id8" draw:id="id8" draw:layer="layout" svg:width="2.916cm" svg:height="2.235cm" svg:x="12.202cm" svg:y="68.044cm">
          <draw:glue-point draw:id="8" svg:x="-2.822cm" svg:y="-5.239cm"/>
          <text:p text:style-name="P18"><text:span text:style-name="T15">Eliakim</text:span></text:p>
          <text:p text:style-name="P18"><text:span text:style-name="T16">2Ki 23:34</text:span></text:p>
          <text:p text:style-name="P18"><text:span text:style-name="T15">Jehoiakim</text:span></text:p>
          <text:p text:style-name="P18"><text:span text:style-name="T12">2Ki 23:34</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48" draw:text-style-name="P17" xml:id="id7" draw:id="id7" draw:layer="layout" svg:width="2.858cm" svg:height="4.128cm" svg:x="14.112cm" svg:y="71.158cm">
          <draw:glue-point draw:id="8" svg:x="-0.783cm" svg:y="-5.171cm"/>
          <draw:glue-point draw:id="9" svg:x="-5.185cm" svg:y="2.488cm"/>
          <text:p text:style-name="P16"><text:span text:style-name="T15">Jehoiachin</text:span></text:p>
          <text:p text:style-name="P16"><text:span text:style-name="T16">2Ki 24:6</text:span></text:p>
          <text:p text:style-name="P16"><text:span text:style-name="T15">Jeconiah</text:span></text:p>
          <text:p text:style-name="P16"><text:span text:style-name="T12">1Ch 3:16</text:span></text:p>
          <text:p text:style-name="P16"><text:span text:style-name="T15">Coniah</text:span></text:p>
          <text:p text:style-name="P16"><text:span text:style-name="T12">Jer 22:24</text:span></text:p>
          <text:p text:style-name="P16"><text:span text:style-name="T15">Jechonias</text:span></text:p>
          <text:p text:style-name="P16"><text:span text:style-name="T12">Mat 1:1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49" draw:text-style-name="P17" xml:id="id46" draw:id="id46" draw:layer="layout" svg:width="2.592cm" svg:height="2.235cm" svg:x="6.947cm" svg:y="68.044cm">
          <draw:glue-point draw:id="8" svg:x="-2.349cm" svg:y="-5.239cm"/>
          <draw:glue-point draw:id="9" svg:x="2.55cm" svg:y="-5.239cm"/>
          <text:p text:style-name="P16"><text:span text:style-name="T20">Jehoahaz</text:span></text:p>
          <text:p text:style-name="P16"><text:span text:style-name="T16">2Ki 23:30</text:span></text:p>
          <text:p text:style-name="P16"><text:span text:style-name="T20">Shallum</text:span></text:p>
          <text:p text:style-name="P16"><text:span text:style-name="T21">Jer 22:1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50" draw:text-style-name="P17" xml:id="id73" draw:id="id73" draw:layer="layout" svg:width="2.912cm" svg:height="2.235cm" svg:x="3.347cm" svg:y="68.044cm">
          <text:p text:style-name="P16"><text:span text:style-name="T20">Mattaniah</text:span></text:p>
          <text:p text:style-name="P16"><text:span text:style-name="T21">2Ki 24:17</text:span></text:p>
          <text:p text:style-name="P16"><text:span text:style-name="T20">Zedekiah</text:span></text:p>
          <text:p text:style-name="P16"><text:span text:style-name="T21">2Ch 36:1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8" draw:text-style-name="P8" draw:layer="layout" draw:type="curve" draw:line-skew="0.517cm" svg:x1="12.914cm" svg:y1="53.964cm" svg:x2="11.112cm" svg:y2="55.843cm" draw:start-shape="id84" draw:start-glue-point="0" draw:end-shape="id52" draw:end-glue-point="0" svg:d="M12914 53964c0 2226-1802 1287-1802 1879" svg:viewBox="0 0 1803 1880">
          <text:p/>
        </draw:connector>
        <draw:custom-shape draw:style-name="gr51" draw:text-style-name="P13" xml:id="id85" draw:id="id85" draw:layer="layout" svg:width="2.366cm" svg:height="1.607cm" svg:x="13.382cm" svg:y="53.163cm">
          <text:p text:style-name="P9"><text:span text:style-name="T15">Abijah</text:span></text:p>
          <text:p text:style-name="P9"><text:span text:style-name="T16">2Ch 29: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6" draw:text-style-name="P8" xml:id="id84" draw:id="id84" draw:layer="layout" draw:type="curve" svg:x1="13.382cm" svg:y1="53.966cm" svg:x2="12.367cm" svg:y2="53.962cm" draw:start-shape="id85" draw:start-glue-point="5" draw:end-shape="id51" draw:end-glue-point="7" svg:d="M13382 53966c-721 0-214-4-1015-4" svg:viewBox="0 0 1016 5">
          <text:p/>
        </draw:connector>
        <draw:custom-shape draw:style-name="gr52" draw:text-style-name="P13" xml:id="id86" draw:id="id86" draw:layer="layout" svg:width="2.901cm" svg:height="1.607cm" svg:x="13.33cm" svg:y="56.146cm">
          <text:p text:style-name="P9"><text:span text:style-name="T22">Hephzi-bah</text:span></text:p>
          <text:p text:style-name="P9"><text:span text:style-name="T16">2Ki 21: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6" draw:text-style-name="P8" xml:id="id77" draw:id="id77" draw:layer="layout" draw:type="curve" svg:x1="13.33cm" svg:y1="56.949cm" svg:x2="12.363cm" svg:y2="56.955cm" draw:start-shape="id86" draw:start-glue-point="5" draw:end-shape="id52" draw:end-glue-point="7" svg:d="M13330 56949c-685 0-202 6-967 6" svg:viewBox="0 0 968 7">
          <text:p/>
        </draw:connector>
        <draw:connector draw:style-name="gr6" draw:text-style-name="P8" xml:id="id70" draw:id="id70" draw:layer="layout" draw:type="line" svg:x1="8.504cm" svg:y1="3.328cm" svg:x2="9.029cm" svg:y2="3.328cm" draw:start-shape="id87" draw:start-glue-point="7" draw:end-shape="id88" draw:end-glue-point="5" svg:d="M8504 3328h525" svg:viewBox="0 0 526 1">
          <text:p/>
        </draw:connector>
        <draw:custom-shape draw:style-name="gr53" draw:text-style-name="P22" xml:id="id10" draw:id="id10" draw:layer="layout" svg:width="2.858cm" svg:height="1.27cm" svg:x="11.682cm" svg:y="5.712cm">
          <text:p text:style-name="P21"><text:span text:style-name="T17">Samuel</text:span></text:p>
          <text:p text:style-name="P21"><text:span text:style-name="T18">1Sa 9:15,16</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54" draw:text-style-name="P13" xml:id="id89" draw:id="id89" draw:layer="layout" svg:width="2.51cm" svg:height="1.607cm" svg:x="13.604cm" svg:y="64.999cm">
          <text:p text:style-name="P9"><text:span text:style-name="T15">Zebudah</text:span></text:p>
          <text:p text:style-name="P9"><text:span text:style-name="T16">2Ki 23:36</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6" draw:text-style-name="P8" xml:id="id44" draw:id="id44" draw:layer="layout" draw:type="curve" svg:x1="12.634cm" svg:y1="65.802cm" svg:x2="13.604cm" svg:y2="65.802cm" draw:start-shape="id47" draw:start-glue-point="7" draw:end-shape="id89" draw:end-glue-point="5" svg:d="M12634 65802h970" svg:viewBox="0 0 971 1">
          <text:p/>
        </draw:connector>
        <draw:custom-shape draw:style-name="gr55" draw:text-style-name="P13" xml:id="id9" draw:id="id9" draw:layer="layout" svg:width="2.568cm" svg:height="1.607cm" svg:x="15.885cm" svg:y="68.356cm">
          <text:p text:style-name="P9"><text:span text:style-name="T15">Nehushta</text:span></text:p>
          <text:p text:style-name="P9"><text:span text:style-name="T16">2Ki 24:8</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6" draw:text-style-name="P8" xml:id="id45" draw:id="id45" draw:layer="layout" draw:type="curve" svg:x1="9.815cm" svg:y1="65.802cm" svg:x2="8.616cm" svg:y2="65.803cm" draw:start-shape="id47" draw:start-glue-point="5" draw:end-shape="id90" draw:end-glue-point="7" svg:d="M9815 65802c-937 0-338 1-1199 1" svg:viewBox="0 0 1200 2">
          <text:p/>
        </draw:connector>
        <draw:custom-shape draw:style-name="gr56" draw:text-style-name="P13" xml:id="id90" draw:id="id90" draw:layer="layout" svg:width="3.602cm" svg:height="1.607cm" svg:x="5.014cm" svg:y="65cm">
          <text:p text:style-name="P9"><text:span text:style-name="T15">Hamutal</text:span></text:p>
          <text:p text:style-name="P9"><text:span text:style-name="T16">2Ki 23:31, 24:18</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57" draw:text-style-name="P19" xml:id="id74" draw:id="id74" draw:layer="layout" svg:width="2.54cm" svg:height="1.917cm" svg:x="15.382cm" svg:y="76.205cm">
          <text:p text:style-name="P18"><text:span text:style-name="T23">Gedaliah</text:span></text:p>
          <text:p text:style-name="P18"><text:span text:style-name="T16">2Ki 25:22</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58" draw:text-style-name="P17" xml:id="id72" draw:id="id72" draw:layer="layout" svg:width="4.869cm" svg:height="2.998cm" svg:x="8.908cm" svg:y="74.924cm">
          <draw:glue-point draw:id="8" svg:x="-5.115cm" svg:y="-2.729cm"/>
          <draw:glue-point draw:id="9" svg:x="-5.115cm" svg:y="2.953cm"/>
          <draw:glue-point draw:id="10" svg:x="5.109cm" svg:y="2.471cm"/>
          <draw:glue-point draw:id="11" svg:x="-3.148cm" svg:y="-5.176cm"/>
          <draw:glue-point draw:id="12" svg:x="-2.407cm" svg:y="-5.176cm"/>
          <text:p text:style-name="P16"><text:span text:style-name="T20">Nebuchadnezzar</text:span></text:p>
          <text:p text:style-name="P16"><text:span text:style-name="T24">king of Babylon</text:span></text:p>
          <text:p text:style-name="P16"><text:span text:style-name="T21">2Ki 24:1</text:span></text:p>
          <text:p text:style-name="P16"><text:span text:style-name="T20">Nebuchadrezzar</text:span></text:p>
          <text:p text:style-name="P16"><text:span text:style-name="T21">Jer 21:2</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59" draw:text-style-name="P19" xml:id="id76" draw:id="id76" draw:layer="layout" svg:width="3.772cm" svg:height="1.709cm" svg:x="9.381cm" svg:y="79.013cm">
          <text:p text:style-name="P18"><text:span text:style-name="T23">Evil-merodach</text:span></text:p>
          <text:p text:style-name="P18"><text:span text:style-name="T16">2Ki 25:27</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60" draw:text-style-name="P13" xml:id="id49" draw:id="id49" draw:layer="layout" svg:width="2.362cm" svg:height="1.607cm" svg:x="13.346cm" svg:y="62.051cm">
          <text:p text:style-name="P9"><text:span text:style-name="T15">Jedidah</text:span></text:p>
          <text:p text:style-name="P9"><text:span text:style-name="T16">2Ki 22: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61" draw:text-style-name="P10" xml:id="id35" draw:id="id35" draw:layer="layout" svg:width="2.83cm" svg:height="2.235cm" svg:x="9.621cm" svg:y="20.689cm">
          <draw:glue-point draw:id="8" svg:x="4.795cm" svg:y="-4.715cm"/>
          <text:p text:style-name="P9"><text:span text:style-name="T5">Rehoboam</text:span></text:p>
          <text:p text:style-name="P9"><text:span text:style-name="T8">1Ki 14:21</text:span></text:p>
          <text:p text:style-name="P9"><text:span text:style-name="T5">Roboam</text:span></text:p>
          <text:p text:style-name="P9"><text:span text:style-name="T8">Mat 1:7</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62" draw:text-style-name="P10" xml:id="id60" draw:id="id60" draw:layer="layout" svg:width="4.258cm" svg:height="2.858cm" svg:x="8.89cm" svg:y="24.304cm">
          <draw:glue-point draw:id="8" svg:x="-0.655cm" svg:y="-5.146cm"/>
          <text:p text:style-name="P9"><text:span text:style-name="T11">Abijam</text:span></text:p>
          <text:p text:style-name="P9"><text:span text:style-name="T12">1Ki 14:31</text:span></text:p>
          <text:p text:style-name="P9"><text:span text:style-name="T11">Abijah</text:span></text:p>
          <text:p text:style-name="P9"><text:span text:style-name="T8">2Ch 12:16</text:span></text:p>
          <text:p text:style-name="P9"><text:span text:style-name="T13">Abia</text:span><text:span text:style-name="T25"> </text:span></text:p>
          <text:p text:style-name="P9"><text:span text:style-name="T8">1Ch 3:10, Mat 1:7</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63" draw:text-style-name="P10" xml:id="id58" draw:id="id58" draw:layer="layout" svg:width="2.504cm" svg:height="1.579cm" svg:x="9.765cm" svg:y="28.123cm">
          <draw:glue-point draw:id="8" svg:x="-2.288cm" svg:y="-5.053cm"/>
          <text:p text:style-name="P9"><text:span text:style-name="T11">Asa</text:span></text:p>
          <text:p text:style-name="P9"><text:span text:style-name="T16">1Ki 15:8</text:span></text:p>
          <text:p text:style-name="P9"><text:span text:style-name="T16">2Ch 14: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6" draw:text-style-name="P8" xml:id="id80" draw:id="id80" draw:layer="layout" draw:type="curve" svg:x1="13.273cm" svg:y1="21.805cm" svg:x2="12.451cm" svg:y2="21.807cm" draw:start-shape="id91" draw:start-glue-point="5" draw:end-shape="id35" draw:end-glue-point="7" svg:d="M13273 21805c-576 0-165 2-822 2" svg:viewBox="0 0 823 3">
          <text:p/>
        </draw:connector>
        <draw:connector draw:style-name="gr9" draw:text-style-name="P8" draw:layer="layout" draw:type="curve" svg:x1="10.496cm" svg:y1="10.275cm" svg:x2="11.606cm" svg:y2="14.238cm" draw:start-shape="id11" draw:start-glue-point="9" draw:end-shape="id67" draw:end-glue-point="8" svg:d="M10496 10275c740 0 1110 1321 1110 3963" svg:viewBox="0 0 1111 3964">
          <text:p/>
        </draw:connector>
        <draw:connector draw:style-name="gr9" draw:text-style-name="P8" draw:layer="layout" draw:type="curve" svg:x1="18.452cm" svg:y1="10.834cm" svg:x2="14.54cm" svg:y2="6.347cm" draw:start-shape="id33" draw:start-glue-point="6" draw:end-shape="id10" draw:end-glue-point="7" svg:d="M18452 10834c0-2992-1304-4487-3912-4487" svg:viewBox="0 0 3913 4488">
          <text:p/>
        </draw:connector>
        <draw:custom-shape draw:style-name="gr64" draw:text-style-name="P28" xml:id="id33" draw:id="id33" draw:layer="layout" svg:width="4.762cm" svg:height="2.54cm" svg:x="15.886cm" svg:y="10.592cm">
          <draw:glue-point draw:id="4" svg:x="-0.726cm" svg:y="4.862cm"/>
          <draw:glue-point draw:id="5" svg:x="1.272cm" svg:y="3.614cm"/>
          <draw:glue-point draw:id="6" svg:x="0.39cm" svg:y="-4.051cm"/>
          <text:p text:style-name="P27"><text:span text:style-name="T5">LORD</text:span></text:p>
          <text:p text:style-name="P27"><text:span text:style-name="T26">1Sa 9:15,16</text:span></text:p>
          <text:p text:style-name="P27"><text:span text:style-name="T26">1Ki 11:31-35</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5" draw:text-style-name="P19" xml:id="id43" draw:id="id43" draw:layer="layout" svg:width="3.788cm" svg:height="2.722cm" svg:x="8.904cm" svg:y="70.539cm">
          <text:p text:style-name="P18"><text:span text:style-name="T17">Pharaoh-nechoh </text:span><text:span text:style-name="T27">king of Egypt</text:span></text:p>
          <text:p text:style-name="P18"><text:span text:style-name="T18">2Ki 23:34</text:span></text:p>
          <text:p text:style-name="P18"><text:span text:style-name="T28">Necho</text:span></text:p>
          <text:p text:style-name="P18"><text:span text:style-name="T16">2Ch 36:4</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66" draw:text-style-name="P30" xml:id="id13" draw:id="id13" draw:layer="layout" svg:width="2.54cm" svg:height="1.981cm" svg:x="18.96cm" svg:y="33.439cm">
          <draw:glue-point draw:id="8" svg:x="2.893cm" svg:y="5.27cm"/>
          <text:p text:style-name="P29"><text:span text:style-name="T9">Jehoram</text:span></text:p>
          <text:p text:style-name="P29"><text:span text:style-name="T29">2Ki 1:17</text:span></text:p>
          <text:p text:style-name="P29"><text:span text:style-name="T9">Joram</text:span></text:p>
          <text:p text:style-name="P29"><text:span text:style-name="T30">2Ki 8:16</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67" draw:text-style-name="P30" xml:id="id12" draw:id="id12" draw:layer="layout" svg:width="2.54cm" svg:height="1.524cm" svg:x="22.228cm" svg:y="33.639cm">
          <draw:glue-point draw:id="8" svg:x="2.406cm" svg:y="-5.07cm"/>
          <text:p text:style-name="P29"><text:span text:style-name="T31">Ahaziah</text:span></text:p>
          <text:p text:style-name="P29"><text:span text:style-name="T32">1Ki 22:4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68" draw:text-style-name="P30" xml:id="id81" draw:id="id81" draw:layer="layout" svg:width="2.382cm" svg:height="1.507cm" svg:x="20.66cm" svg:y="29.412cm">
          <text:p text:style-name="P29"><text:span text:style-name="T9">Ahab</text:span></text:p>
          <text:p text:style-name="P29"><text:span text:style-name="T30">1Ki 16:28 </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69" draw:text-style-name="P32" xml:id="id27" draw:id="id27" draw:layer="layout" svg:width="2.997cm" svg:height="1.524cm" svg:x="20.717cm" svg:y="25.796cm">
          <text:p text:style-name="P31"><text:span text:style-name="T9">Omri</text:span></text:p>
          <text:p text:style-name="P31"><text:span text:style-name="T32">1Ki 16:16,2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70" draw:text-style-name="P13" xml:id="id25" draw:id="id25" draw:layer="layout" svg:width="3.175cm" svg:height="1.587cm" svg:x="15.061cm" svg:y="33.634cm">
          <text:p text:style-name="P9"><text:span text:style-name="T33">Athaliah</text:span></text:p>
          <text:p text:style-name="P9"><text:span text:style-name="T7">2Ki 8:18, 11:1</text:span></text:p>
          <text:p text:style-name="P9"><text:span text:style-name="T7">2Ch 22:2</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71" draw:text-style-name="P22" xml:id="id93" draw:id="id93" draw:layer="layout" svg:width="2.475cm" svg:height="1.257cm" svg:x="22.476cm" svg:y="15.83cm">
          <text:p text:style-name="P21"><text:span text:style-name="T17">Nebat</text:span></text:p>
          <text:p text:style-name="P21"><text:span text:style-name="T18">1Ki 11:26</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72" draw:text-style-name="P24" xml:id="id92" draw:id="id92" draw:layer="layout" svg:width="2.398cm" svg:height="1.257cm" svg:x="19.553cm" svg:y="15.83cm">
          <text:p text:style-name="P23"><text:span text:style-name="T17">Zeruah</text:span></text:p>
          <text:p text:style-name="P23"><text:span text:style-name="T18">1Ki 11:26</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6" draw:text-style-name="P8" xml:id="id34" draw:id="id34" draw:layer="layout" draw:type="line" svg:x1="21.951cm" svg:y1="16.459cm" svg:x2="22.476cm" svg:y2="16.459cm" draw:start-shape="id92" draw:start-glue-point="7" draw:end-shape="id93" draw:end-glue-point="5" svg:d="M21951 16459h525" svg:viewBox="0 0 526 1">
          <text:p/>
        </draw:connector>
        <draw:custom-shape draw:style-name="gr73" draw:text-style-name="P12" xml:id="id32" draw:id="id32" draw:layer="layout" svg:width="2.819cm" svg:height="1.524cm" svg:x="20.807cm" svg:y="20.176cm">
          <text:p text:style-name="P11"><text:span text:style-name="T9">Nadab</text:span></text:p>
          <text:p text:style-name="P11"><text:span text:style-name="T10">1Ki 14:20</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74" draw:text-style-name="P12" xml:id="id30" draw:id="id30" draw:layer="layout" svg:width="3.008cm" svg:height="1.524cm" svg:x="16.807cm" svg:y="20.176cm">
          <text:p text:style-name="P11"><text:span text:style-name="T9">Baasha</text:span></text:p>
          <text:p text:style-name="P11"><text:span text:style-name="T10">1Ki 15:27,28</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11" draw:text-style-name="P8" draw:layer="layout" draw:type="curve" svg:x1="20.807cm" svg:y1="20.938cm" svg:x2="19.815cm" svg:y2="20.938cm" draw:start-shape="id32" draw:start-glue-point="5" draw:end-shape="id30" draw:end-glue-point="7" svg:d="M20807 20938h-992" svg:viewBox="0 0 993 1">
          <text:p/>
        </draw:connector>
        <draw:custom-shape draw:style-name="gr75" draw:text-style-name="P12" xml:id="id29" draw:id="id29" draw:layer="layout" svg:width="2.997cm" svg:height="1.524cm" svg:x="16.813cm" svg:y="22.937cm">
          <text:p text:style-name="P11"><text:span text:style-name="T9">Elah</text:span></text:p>
          <text:p text:style-name="P11"><text:span text:style-name="T10">1Ki 16:6,8</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76" draw:text-style-name="P12" xml:id="id28" draw:id="id28" draw:layer="layout" svg:width="3.008cm" svg:height="1.524cm" svg:x="20.708cm" svg:y="22.938cm">
          <text:p text:style-name="P11"><text:span text:style-name="T9">Zimri</text:span></text:p>
          <text:p text:style-name="P11"><text:span text:style-name="T10">1Ki 16:10,15</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77" draw:text-style-name="P32" xml:id="id26" draw:id="id26" draw:layer="layout" svg:width="2.997cm" svg:height="1.524cm" svg:x="16.517cm" svg:y="25.797cm">
          <text:p text:style-name="P31"><text:span text:style-name="T9">Tibni</text:span></text:p>
          <text:p text:style-name="P31"><text:span text:style-name="T32">1Ki 16:2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78" draw:text-style-name="P30" xml:id="id16" draw:id="id16" draw:layer="layout" svg:width="3.099cm" svg:height="1.524cm" svg:x="18.681cm" svg:y="37.022cm">
          <draw:glue-point draw:id="8" svg:x="2.406cm" svg:y="-5.07cm"/>
          <text:p text:style-name="P29"><text:span text:style-name="T9">Jehu</text:span></text:p>
          <text:p text:style-name="P29"><text:span text:style-name="T32">2Ki 9:3, 10:3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79" draw:text-style-name="P30" xml:id="id17" draw:id="id17" draw:layer="layout" svg:width="3.353cm" svg:height="1.524cm" svg:x="18.556cm" svg:y="39.155cm">
          <draw:glue-point draw:id="8" svg:x="2.406cm" svg:y="-5.07cm"/>
          <text:p text:style-name="P29"><text:span text:style-name="T9">Jehoahaz</text:span></text:p>
          <text:p text:style-name="P29"><text:span text:style-name="T32">2Ki 10:35, 13: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80" draw:text-style-name="P30" xml:id="id18" draw:id="id18" draw:layer="layout" svg:width="3.048cm" svg:height="1.931cm" svg:x="18.708cm" svg:y="41.356cm">
          <draw:glue-point draw:id="8" svg:x="2.406cm" svg:y="-5.07cm"/>
          <text:p text:style-name="P29"><text:span text:style-name="T9">Joash</text:span></text:p>
          <text:p text:style-name="P29"><text:span text:style-name="T32">2Ki 13:9</text:span></text:p>
          <text:p text:style-name="P29"><text:span text:style-name="T34">Jehoash</text:span></text:p>
          <text:p text:style-name="P29"><text:span text:style-name="T32">2Ki 13:1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81" draw:text-style-name="P30" xml:id="id20" draw:id="id20" draw:layer="layout" svg:width="3.099cm" svg:height="1.524cm" svg:x="18.681cm" svg:y="46.224cm">
          <draw:glue-point draw:id="8" svg:x="2.406cm" svg:y="-5.07cm"/>
          <text:p text:style-name="P29"><text:span text:style-name="T9">Zachariah</text:span></text:p>
          <text:p text:style-name="P29"><text:span text:style-name="T32">2Ki 14:29</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82" draw:text-style-name="P30" xml:id="id19" draw:id="id19" draw:layer="layout" svg:width="3.099cm" svg:height="1.524cm" svg:x="18.681cm" svg:y="43.97cm">
          <draw:glue-point draw:id="8" svg:x="2.406cm" svg:y="-5.07cm"/>
          <text:p text:style-name="P29"><text:span text:style-name="T9">Jeroboam</text:span></text:p>
          <text:p text:style-name="P29"><text:span text:style-name="T32">2Ki 13:13, 14:16</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83" draw:text-style-name="P30" xml:id="id23" draw:id="id23" draw:layer="layout" svg:width="3.099cm" svg:height="1.524cm" svg:x="18.681cm" svg:y="48.425cm">
          <draw:glue-point draw:id="8" svg:x="2.406cm" svg:y="-5.07cm"/>
          <text:p text:style-name="P29"><text:span text:style-name="T9">Shallum</text:span></text:p>
          <text:p text:style-name="P29"><text:span text:style-name="T32">2Ki 15:10,13</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84" draw:text-style-name="P30" xml:id="id14" draw:id="id14" draw:layer="layout" svg:width="3.099cm" svg:height="1.524cm" svg:x="18.681cm" svg:y="50.726cm">
          <draw:glue-point draw:id="8" svg:x="2.406cm" svg:y="-5.07cm"/>
          <text:p text:style-name="P29"><text:span text:style-name="T9">Menahem</text:span></text:p>
          <text:p text:style-name="P29"><text:span text:style-name="T32">2Ki 15:14,17</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85" draw:text-style-name="P30" xml:id="id15" draw:id="id15" draw:layer="layout" svg:width="3.099cm" svg:height="1.524cm" svg:x="18.681cm" svg:y="52.927cm">
          <draw:glue-point draw:id="8" svg:x="2.406cm" svg:y="-5.07cm"/>
          <text:p text:style-name="P29"><text:span text:style-name="T9">Pekahiah</text:span></text:p>
          <text:p text:style-name="P29"><text:span text:style-name="T32">2Ki 15:22,23</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86" draw:text-style-name="P30" xml:id="id21" draw:id="id21" draw:layer="layout" svg:width="3.099cm" svg:height="1.524cm" svg:x="18.681cm" svg:y="55.028cm">
          <draw:glue-point draw:id="8" svg:x="2.406cm" svg:y="-5.07cm"/>
          <text:p text:style-name="P29"><text:span text:style-name="T9">Pekah</text:span></text:p>
          <text:p text:style-name="P29"><text:span text:style-name="T32">2Ki 15:25,27</text:span></text:p>
          <text:p text:style-name="P29"><text:span text:style-name="T32">2Ki 15:29</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87" draw:text-style-name="P30" xml:id="id22" draw:id="id22" draw:layer="layout" svg:width="3.099cm" svg:height="1.524cm" svg:x="18.681cm" svg:y="57.229cm">
          <draw:glue-point draw:id="8" svg:x="2.406cm" svg:y="-5.07cm"/>
          <text:p text:style-name="P29"><text:span text:style-name="T9">Hoshea</text:span></text:p>
          <text:p text:style-name="P29"><text:span text:style-name="T32">2Ki 15:3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utfit" svg:font-family="Outfit"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3" draw:display-name="Arrowheads 3" svg:viewBox="0 0 20 20" svg:d="M0 20l10-20 10 20z"/>
    <draw:stroke-dash draw:name="Dash" draw:style="rect" draw:dots1="1" draw:dots1-length="300%" draw:distance="100%"/>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4"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762cm" fo:margin-bottom="0.762cm" fo:margin-left="0.762cm" fo:margin-right="0.762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7-29T08:58:09.242000000</meta:creation-date>
    <dc:date>2025-01-12T14:17:49.371000000</dc:date>
    <meta:editing-duration>P2DT16H27M24S</meta:editing-duration>
    <meta:editing-cycles>950</meta:editing-cycles>
    <meta:generator>LibreOffice/24.8.4.2$Windows_X86_64 LibreOffice_project/bb3cfa12c7b1bf994ecc5649a80400d06cd71002</meta:generator>
    <meta:print-date>2024-07-29T20:22:25.629000000</meta:print-date>
    <meta:printed-by>PDF files</meta:printed-by>
    <meta:document-statistic meta:object-count="187"/>
  </office:meta>
</office:document-meta>
</file>