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 style:list-style-name="L1">
      <style:graphic-properties svg:stroke-width="0cm" svg:stroke-color="#3465a4" draw:marker-start-width="0.2cm" draw:marker-end-width="0.2cm" draw:fill-color="#b4c7dc" draw:textarea-horizontal-align="justify" draw:textarea-vertical-align="middle" draw:auto-grow-height="false" fo:min-height="1.368cm" fo:min-width="2.726cm" fo:padding-top="0.125cm" fo:padding-bottom="0.125cm" fo:padding-left="0.25cm" fo:padding-right="0.25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cm" svg:stroke-color="#3465a4" draw:marker-start-width="0.2cm" draw:marker-end-width="0.2cm" draw:fill-color="#b4c7dc" draw:textarea-horizontal-align="justify" draw:textarea-vertical-align="middle" draw:auto-grow-height="false" fo:min-height="0.61cm" fo:min-width="1.52cm" fo:padding-top="0.125cm" fo:padding-bottom="0.125cm" fo:padding-left="0.25cm" fo:padding-right="0.2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cm" svg:stroke-color="#3465a4" draw:marker-start-width="0.2cm" draw:marker-end-width="0.2cm" draw:fill-color="#b4c7dc" draw:textarea-horizontal-align="justify" draw:textarea-vertical-align="middle" draw:auto-grow-height="false" fo:min-height="1.369cm" fo:min-width="2.094cm" fo:padding-top="0.125cm" fo:padding-bottom="0.125cm" fo:padding-left="0.25cm" fo:padding-right="0.25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fill-color="#f7d1d5" draw:textarea-horizontal-align="justify" draw:textarea-vertical-align="middle" draw:auto-grow-height="false" fo:min-height="0.896cm" fo:min-width="1.916cm" style:writing-mode="lr-tb" loext:decorative="false"/>
      <style:paragraph-properties style:writing-mode="lr-tb"/>
    </style:style>
    <style:style style:name="gr6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cm" svg:stroke-color="#3465a4" draw:marker-start-width="0.2cm" draw:marker-end-width="0.2cm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ffff00" draw:marker-start-width="0.279cm" draw:marker-end-width="0.279cm" draw:fill-color="#b4c7dc" draw:textarea-horizontal-align="justify" draw:textarea-vertical-align="middle" draw:auto-grow-height="false" fo:min-height="1.436cm" fo:min-width="1.802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212cm" svg:stroke-color="#80008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0" style:family="graphic" style:parent-style-name="standard" style:list-style-name="L1">
      <style:graphic-properties draw:fill-color="#f7d1d5" draw:textarea-horizontal-align="justify" draw:textarea-vertical-align="middle" draw:auto-grow-height="false" fo:min-height="0.896cm" fo:min-width="1.916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cm" svg:stroke-color="#3465a4" draw:marker-start-width="0.2cm" draw:marker-end-width="0.2cm" draw:fill-color="#b4c7dc" draw:textarea-horizontal-align="justify" draw:textarea-vertical-align="middle" draw:auto-grow-height="false" fo:min-height="1.488cm" fo:min-width="1.854cm" fo:padding-top="0.125cm" fo:padding-bottom="0.125cm" fo:padding-left="0.25cm" fo:padding-right="0.2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f7d1d5" draw:textarea-horizontal-align="justify" draw:textarea-vertical-align="middle" draw:auto-grow-height="false" fo:min-height="1.614cm" fo:min-width="2.736cm" style:writing-mode="lr-tb" loext:decorative="false"/>
      <style:paragraph-properties style:writing-mode="lr-tb"/>
    </style:style>
    <style:style style:name="gr13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2.422cm" fo:min-width="1.794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2.522cm" fo:min-width="1.794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1.469cm" fo:min-width="1.854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solid" draw:stroke-dash="Dash"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draw:stroke="dash" draw:stroke-dash="Dash"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 style:list-style-name="L1">
      <style:graphic-properties svg:stroke-width="0.018cm" svg:stroke-color="#ffff00" draw:marker-start-width="0.227cm" draw:marker-end-width="0.227cm" draw:fill-color="#b4c7dc" draw:textarea-horizontal-align="justify" draw:textarea-vertical-align="middle" draw:auto-grow-height="false" fo:min-height="1.016cm" fo:min-width="2.214cm" fo:padding-top="0.134cm" fo:padding-bottom="0.134cm" fo:padding-left="0.259cm" fo:padding-right="0.259cm" style:writing-mode="lr-tb" loext:decorative="false"/>
      <style:paragraph-properties style:writing-mode="lr-tb"/>
    </style:style>
    <style:style style:name="gr19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2.228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1.469cm" fo:min-width="2.489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1.098cm" fo:min-width="2.158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1.952cm" fo:min-width="1.802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2.234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A4" style:list-style-name="L1">
      <style:graphic-properties draw:stroke-dash="Dash_20_Dot_20_4" svg:stroke-width="0cm" svg:stroke-color="#3465a4" draw:marker-start-width="0.2cm" draw:marker-end-width="0.2cm" draw:fill="solid" draw:fill-color="#b4c7dc" draw:textarea-horizontal-align="justify" draw:textarea-vertical-align="middle" draw:auto-grow-height="false" fo:min-height="0.896cm" fo:min-width="1.916cm" fo:padding-top="0.125cm" fo:padding-bottom="0.125cm" fo:padding-left="0.25cm" fo:padding-right="0.25cm" fo:wrap-option="wrap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972cm" fo:min-width="4.262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Ubuntu" fo:font-size="12pt" fo:font-style="normal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2pt" fo:font-style="normal" fo:font-weight="normal" style:letter-kerning="true" style:font-name-asian="Microsoft YaHei" style:font-size-asian="18pt" style:font-weight-asian="bold" style:font-name-complex="Arial" style:font-size-complex="18pt" style:font-weight-complex="bold"/>
    </style:style>
    <style:style style:name="P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style="normal" fo:font-weight="normal" style:letter-kerning="true" style:font-name-asian="Microsoft YaHei" style:font-size-asian="18pt" style:font-weight-asian="bold" style:font-name-complex="Arial" style:font-size-complex="18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2pt" fo:font-style="normal" fo:font-weight="normal"/>
    </style:style>
    <style:style style:name="P5" style:family="paragraph">
      <loext:graphic-properties draw:fill-color="#f7d1d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style="normal" fo:font-weight="normal"/>
    </style:style>
    <style:style style:name="P6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style="normal" fo:font-weight="normal" style:letter-kerning="true" style:font-name-asian="Microsoft YaHei" style:font-size-asian="18pt" style:font-weight-asian="bold" style:font-name-complex="Arial" style:font-size-complex="18pt" style:font-weight-complex="bold"/>
    </style:style>
    <style:style style:name="P7" style:family="paragraph">
      <style:paragraph-properties fo:text-align="center"/>
      <style:text-properties fo:color="#ff0000" loext:opacity="100%"/>
    </style:style>
    <style:style style:name="P8" style:family="paragraph">
      <style:paragraph-properties fo:text-align="center" style:writing-mode="lr-tb"/>
      <style:text-properties fo:color="#ff0000" loext:opacity="100%"/>
    </style:style>
    <style:style style:name="T1" style:family="text">
      <style:text-properties style:font-name="Ubuntu" fo:font-size="12pt" fo:font-style="normal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2" style:family="text">
      <style:text-properties style:font-name="Ubuntu" fo:font-size="10pt" fo:font-style="normal" fo:font-weight="normal" style:letter-kerning="true" style:font-name-asian="Microsoft YaHei" style:font-size-asian="10pt" style:font-weight-asian="normal" style:font-name-complex="Arial" style:font-size-complex="10pt" style:font-weight-complex="normal"/>
    </style:style>
    <style:style style:name="T3" style:family="text">
      <style:text-properties style:text-position="0% 100%" style:font-name="Ubuntu" fo:font-size="10pt" fo:font-style="normal" fo:font-weight="normal" style:letter-kerning="true" style:font-name-asian="Microsoft YaHei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Ubuntu" fo:font-size="12pt" fo:font-style="normal" fo:font-weight="bold" style:font-size-asian="12pt" style:font-weight-asian="bold" style:font-size-complex="12pt" style:font-weight-complex="bold"/>
    </style:style>
    <style:style style:name="T5" style:family="text">
      <style:text-properties style:font-name="Ubuntu" fo:font-size="10pt" fo:font-style="normal" fo:font-weight="normal" style:letter-kerning="true" style:font-name-asian="Microsoft YaHei" style:font-size-asian="10pt" style:font-weight-asian="bold" style:font-name-complex="Arial" style:font-size-complex="10pt" style:font-weight-complex="bold"/>
    </style:style>
    <style:style style:name="T6" style:family="text">
      <style:text-properties style:font-name="Ubuntu" fo:font-size="10pt" fo:font-style="normal" fo:font-weight="bold" style:letter-kerning="true" style:font-name-asian="Microsoft YaHei" style:font-size-asian="10pt" style:font-weight-asian="bold" style:font-name-complex="Arial" style:font-size-complex="10pt" style:font-weight-complex="bold"/>
    </style:style>
    <style:style style:name="T7" style:family="text">
      <style:text-properties style:font-name="Ubuntu" fo:font-size="10pt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style:font-name="Ubuntu" fo:font-size="12pt" fo:font-style="normal" fo:font-weight="normal" style:letter-kerning="true" style:font-name-asian="Microsoft YaHei" style:font-size-asian="18pt" style:font-weight-asian="bold" style:font-name-complex="Arial" style:font-size-complex="18pt" style:font-weight-complex="bold"/>
    </style:style>
    <style:style style:name="T9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6.411cm" svg:y1="45.806cm" svg:x2="6.414cm" svg:y2="46.94cm" draw:start-shape="id1" draw:start-glue-point="0" draw:end-shape="id2" draw:end-glue-point="0" svg:d="M6411 45806c0 910 3 344 3 1134" svg:viewBox="0 0 4 1135">
          <text:p/>
        </draw:connector>
        <draw:connector draw:style-name="gr1" draw:text-style-name="P1" draw:layer="layout" draw:type="curve" svg:x1="7.339cm" svg:y1="5.294cm" svg:x2="7.336cm" svg:y2="6.516cm" draw:start-shape="id3" draw:start-glue-point="0" draw:end-shape="id4" draw:end-glue-point="0" svg:d="M7339 5294c0 996-3 385-3 1222" svg:viewBox="0 0 4 1223">
          <text:p/>
        </draw:connector>
        <draw:connector draw:style-name="gr1" draw:text-style-name="P1" draw:layer="layout" draw:type="curve" svg:x1="9.083cm" svg:y1="8.692cm" svg:x2="9.09cm" svg:y2="9.89cm" draw:start-shape="id5" draw:start-glue-point="0" draw:end-shape="id6" draw:end-glue-point="0" svg:d="M9083 8692c0 972 7 373 7 1198" svg:viewBox="0 0 8 1199">
          <text:p/>
        </draw:connector>
        <draw:custom-shape draw:style-name="gr2" draw:text-style-name="P3" xml:id="id22" draw:id="id22" draw:layer="layout" svg:width="3.4cm" svg:height="1.792cm" svg:x="7.931cm" svg:y="4.398cm">
          <text:p text:style-name="P2"><text:span text:style-name="T1">Abram</text:span></text:p>
          <text:p text:style-name="P2"><text:span text:style-name="T2">Gen 11:26</text:span></text:p>
          <text:p text:style-name="P2"><text:span text:style-name="T1">Abraham</text:span></text:p>
          <text:p text:style-name="P2"><text:span text:style-name="T2">Jos 24:2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" draw:text-style-name="P3" xml:id="id4" draw:id="id4" draw:layer="layout" svg:width="2.112cm" svg:height="0.952cm" svg:x="6.28cm" svg:y="6.516cm">
          <text:p text:style-name="P2"><text:span text:style-name="T1">Isaac</text:span></text:p>
          <text:p text:style-name="P2"><text:span text:style-name="T2">Gen 21:3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3" xml:id="id25" draw:id="id25" draw:layer="layout" svg:width="2.768cm" svg:height="1.793cm" svg:x="5.954cm" svg:y="7.797cm">
          <text:p text:style-name="P2"><text:span text:style-name="T1">Jacob</text:span></text:p>
          <text:p text:style-name="P2"><text:span text:style-name="T3">Gen 25:26</text:span></text:p>
          <text:p text:style-name="P2"><text:span text:style-name="T1">Israel</text:span></text:p>
          <text:p text:style-name="P2"><text:span text:style-name="T3">Gen 38:28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5" draw:text-style-name="P5" xml:id="id26" draw:id="id26" draw:layer="layout" svg:width="2.54cm" svg:height="1.27cm" svg:x="9.442cm" svg:y="8.056cm">
          <text:p text:style-name="P4"><text:span text:style-name="T4">Leah</text:span></text:p>
          <text:p text:style-name="P4"><text:span text:style-name="T2">Gen 29:35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6" draw:text-style-name="P6" xml:id="id10" draw:id="id10" draw:layer="layout" svg:width="2.54cm" svg:height="1.27cm" svg:x="3.666cm" svg:y="43.596cm">
          <draw:glue-point draw:id="8" svg:x="2.77cm" svg:y="-5.239cm"/>
          <text:p text:style-name="P2"><text:span text:style-name="T1">Jeroham</text:span></text:p>
          <text:p text:style-name="P2"><text:span text:style-name="T5">1Sa 1:1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7" draw:text-style-name="P3" xml:id="id7" draw:id="id7" draw:layer="layout" svg:width="2.54cm" svg:height="1.27cm" svg:x="3.668cm" svg:y="45.172cm">
          <draw:glue-point draw:id="8" svg:x="2.77cm" svg:y="-5.239cm"/>
          <text:p text:style-name="P2"><text:span text:style-name="T1">Elkanah</text:span></text:p>
          <text:p text:style-name="P2"><text:span text:style-name="T2">1Sa 1:1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8" draw:text-style-name="P3" xml:id="id2" draw:id="id2" draw:layer="layout" svg:width="2.54cm" svg:height="1.924cm" svg:x="5.144cm" svg:y="46.94cm">
          <text:p text:style-name="P2"><text:span text:style-name="T1">Samuel</text:span></text:p>
          <text:p text:style-name="P2"><text:span text:style-name="T2">1Sa 1:20</text:span></text:p>
          <text:p text:style-name="P2"><text:span text:style-name="T6">Shemuel</text:span></text:p>
          <text:p text:style-name="P2"><text:span text:style-name="T2">1Ch 6:33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9" draw:text-style-name="P1" xml:id="id1" draw:id="id1" draw:layer="layout" draw:type="curve" svg:x1="6.208cm" svg:y1="45.807cm" svg:x2="6.612cm" svg:y2="45.805cm" draw:start-shape="id7" draw:start-glue-point="7" draw:end-shape="id8" draw:end-glue-point="5" svg:d="M6208 45807c304 0 103-2 404-2" svg:viewBox="0 0 405 3">
          <text:p/>
        </draw:connector>
        <draw:custom-shape draw:style-name="gr10" draw:text-style-name="P5" xml:id="id8" draw:id="id8" draw:layer="layout" svg:width="2.54cm" svg:height="1.27cm" svg:x="6.612cm" svg:y="45.17cm">
          <text:p text:style-name="P4"><text:span text:style-name="T4">Hannah</text:span></text:p>
          <text:p text:style-name="P4"><text:span text:style-name="T2">1Sa 1:1,2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1" draw:text-style-name="P3" xml:id="id21" draw:id="id21" draw:layer="layout" svg:width="2.54cm" svg:height="1.924cm" svg:x="8.359cm" svg:y="1.581cm">
          <text:p text:style-name="P2"><text:span text:style-name="T1">Terah</text:span></text:p>
          <text:p text:style-name="P2"><text:span text:style-name="T2">Gen 11:24</text:span></text:p>
          <text:p text:style-name="P2"><text:span text:style-name="T1">Thara</text:span></text:p>
          <text:p text:style-name="P2"><text:span text:style-name="T2">Luk 3:3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2" draw:text-style-name="P5" xml:id="id23" draw:id="id23" draw:layer="layout" svg:width="3.436cm" svg:height="2.064cm" svg:x="3.311cm" svg:y="4.262cm">
          <text:p text:style-name="P4"><text:span text:style-name="T4">Sarai</text:span></text:p>
          <text:p text:style-name="P4"><text:span text:style-name="T7">Gen 11:29</text:span></text:p>
          <text:p text:style-name="P4"><text:span text:style-name="T4">Sarah</text:span></text:p>
          <text:p text:style-name="P4"><text:span text:style-name="T2">Gen 17:15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3" draw:text-style-name="P6" xml:id="id9" draw:id="id9" draw:layer="layout" svg:width="2.54cm" svg:height="2.918cm" svg:x="3.666cm" svg:y="40.409cm">
          <draw:glue-point draw:id="8" svg:x="2.77cm" svg:y="-5.239cm"/>
          <text:p text:style-name="P2"><text:span text:style-name="T1">Elihu</text:span></text:p>
          <text:p text:style-name="P2"><text:span text:style-name="T5">1Sa 1:1</text:span></text:p>
          <text:p text:style-name="P2"><text:span text:style-name="T1">Eliab</text:span></text:p>
          <text:p text:style-name="P2"><text:span text:style-name="T5">1Ch 6:27</text:span></text:p>
          <text:p text:style-name="P2"><text:span text:style-name="T1">Eliel</text:span></text:p>
          <text:p text:style-name="P2"><text:span text:style-name="T2">1Ch 6:3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4" draw:text-style-name="P6" xml:id="id11" draw:id="id11" draw:layer="layout" svg:width="2.54cm" svg:height="3.018cm" svg:x="3.666cm" svg:y="37.134cm">
          <draw:glue-point draw:id="8" svg:x="2.77cm" svg:y="-5.239cm"/>
          <text:p text:style-name="P2"><text:span text:style-name="T1">Tohu</text:span></text:p>
          <text:p text:style-name="P2"><text:span text:style-name="T5">1Sa 1:1</text:span></text:p>
          <text:p text:style-name="P2"><text:span text:style-name="T1">Nahath</text:span></text:p>
          <text:p text:style-name="P2"><text:span text:style-name="T5">1Ch 6:26</text:span></text:p>
          <text:p text:style-name="P2"><text:span text:style-name="T1">Toah</text:span></text:p>
          <text:p text:style-name="P2"><text:span text:style-name="T5">1Ch 6:3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5" draw:text-style-name="P6" xml:id="id12" draw:id="id12" draw:layer="layout" svg:width="2.54cm" svg:height="1.905cm" svg:x="3.666cm" svg:y="34.981cm">
          <draw:glue-point draw:id="8" svg:x="2.77cm" svg:y="-5.239cm"/>
          <text:p text:style-name="P2"><text:span text:style-name="T1">Zuph</text:span></text:p>
          <text:p text:style-name="P2"><text:span text:style-name="T5">1Sa 1:1</text:span></text:p>
          <text:p text:style-name="P2"><text:span text:style-name="T1">Zophai</text:span></text:p>
          <text:p text:style-name="P2"><text:span text:style-name="T5">1Ch 6:26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6" draw:text-style-name="P1" draw:layer="layout" draw:type="curve" svg:x1="4.936cm" svg:y1="43.327cm" svg:x2="4.936cm" svg:y2="43.596cm" draw:start-shape="id9" draw:start-glue-point="2" draw:end-shape="id10" draw:end-glue-point="0" svg:d="M4936 43327v269" svg:viewBox="0 0 1 270">
          <text:p/>
        </draw:connector>
        <draw:connector draw:style-name="gr17" draw:text-style-name="P1" draw:layer="layout" draw:type="curve" svg:x1="4.936cm" svg:y1="40.152cm" svg:x2="4.936cm" svg:y2="40.409cm" draw:start-shape="id11" draw:start-glue-point="2" draw:end-shape="id9" draw:end-glue-point="0" svg:d="M4936 40152v257" svg:viewBox="0 0 1 258">
          <text:p/>
        </draw:connector>
        <draw:connector draw:style-name="gr17" draw:text-style-name="P1" draw:layer="layout" draw:type="curve" svg:x1="4.936cm" svg:y1="36.886cm" svg:x2="4.936cm" svg:y2="37.134cm" draw:start-shape="id12" draw:start-glue-point="2" draw:end-shape="id11" draw:end-glue-point="0" svg:d="M4936 36886v248" svg:viewBox="0 0 1 249">
          <text:p/>
        </draw:connector>
        <draw:custom-shape draw:style-name="gr18" draw:text-style-name="P3" xml:id="id6" draw:id="id6" draw:layer="layout" svg:width="2.87cm" svg:height="1.422cm" svg:x="7.655cm" svg:y="9.89cm">
          <draw:glue-point draw:id="8" svg:x="2.77cm" svg:y="-5.239cm"/>
          <text:p text:style-name="P2"><text:span text:style-name="T1">Levi</text:span></text:p>
          <text:p text:style-name="P2"><text:span text:style-name="T5">Gen 29:3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9" draw:text-style-name="P6" xml:id="id27" draw:id="id27" draw:layer="layout" svg:width="2.852cm" svg:height="1.27cm" svg:x="7.66cm" svg:y="11.677cm">
          <draw:glue-point draw:id="8" svg:x="2.77cm" svg:y="-5.239cm"/>
          <text:p text:style-name="P2"><text:span text:style-name="T1">Kohath</text:span></text:p>
          <text:p text:style-name="P2"><text:span text:style-name="T5">Gen 46:11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0" draw:text-style-name="P6" xml:id="id28" draw:id="id28" draw:layer="layout" svg:width="3.175cm" svg:height="1.905cm" svg:x="7.502cm" svg:y="13.215cm">
          <draw:glue-point draw:id="8" svg:x="2.77cm" svg:y="-5.239cm"/>
          <text:p text:style-name="P2"><text:span text:style-name="T1">Izhar</text:span></text:p>
          <text:p text:style-name="P2"><text:span text:style-name="T2">1Ch 6:18</text:span></text:p>
          <text:p text:style-name="P2"><text:span text:style-name="T1">Amminadab</text:span></text:p>
          <text:p text:style-name="P2"><text:span text:style-name="T5">1Ch 6:22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1" draw:text-style-name="P6" xml:id="id29" draw:id="id29" draw:layer="layout" svg:width="2.54cm" svg:height="1.27cm" svg:x="7.822cm" svg:y="15.55cm">
          <draw:glue-point draw:id="8" svg:x="2.77cm" svg:y="-5.239cm"/>
          <text:p text:style-name="P2"><text:span text:style-name="T1">Korah</text:span></text:p>
          <text:p text:style-name="P2"><text:span text:style-name="T5">1Ch 6:22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2" draw:text-style-name="P6" xml:id="id33" draw:id="id33" draw:layer="layout" svg:width="2.802cm" svg:height="1.492cm" svg:x="7.694cm" svg:y="18.758cm">
          <draw:glue-point draw:id="8" svg:x="2.77cm" svg:y="-5.239cm"/>
          <text:p text:style-name="P2"><text:span text:style-name="T1">Assir</text:span></text:p>
          <text:p text:style-name="P2"><text:span text:style-name="T5">1Ch 6:22, 37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3" draw:text-style-name="P6" xml:id="id24" draw:id="id24" draw:layer="layout" svg:width="2.54cm" svg:height="1.27cm" svg:x="7.834cm" svg:y="32.158cm">
          <draw:glue-point draw:id="8" svg:x="2.77cm" svg:y="-5.239cm"/>
          <text:p text:style-name="P2"><text:span text:style-name="T1">Elkanah</text:span></text:p>
          <text:p text:style-name="P2"><text:span text:style-name="T5">1Ch 6:23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4" draw:text-style-name="P6" xml:id="id17" draw:id="id17" draw:layer="layout" svg:width="2.54cm" svg:height="1.27cm" svg:x="11.923cm" svg:y="34.98cm">
          <draw:glue-point draw:id="8" svg:x="2.77cm" svg:y="-5.239cm"/>
          <text:p text:style-name="P2"><text:span text:style-name="T1">Ebiasaph</text:span></text:p>
          <text:p text:style-name="P2"><text:span text:style-name="T8">1Ch 6:23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5" draw:text-style-name="P6" xml:id="id16" draw:id="id16" draw:layer="layout" svg:width="2.54cm" svg:height="1.27cm" svg:x="11.925cm" svg:y="36.564cm">
          <draw:glue-point draw:id="8" svg:x="2.77cm" svg:y="-5.239cm"/>
          <text:p text:style-name="P2"><text:span text:style-name="T1">Assir</text:span></text:p>
          <text:p text:style-name="P2"><text:span text:style-name="T8">1Ch 6:23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6" draw:text-style-name="P6" xml:id="id15" draw:id="id15" draw:layer="layout" svg:width="2.54cm" svg:height="1.27cm" svg:x="11.926cm" svg:y="38.165cm">
          <draw:glue-point draw:id="8" svg:x="2.77cm" svg:y="-5.239cm"/>
          <text:p text:style-name="P2"><text:span text:style-name="T1">Tahath</text:span></text:p>
          <text:p text:style-name="P2"><text:span text:style-name="T8">1Ch 6:2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7" draw:text-style-name="P6" xml:id="id13" draw:id="id13" draw:layer="layout" svg:width="2.54cm" svg:height="1.27cm" svg:x="11.925cm" svg:y="39.739cm">
          <draw:glue-point draw:id="8" svg:x="2.77cm" svg:y="-5.239cm"/>
          <text:p text:style-name="P2"><text:span text:style-name="T1">Uriel</text:span></text:p>
          <text:p text:style-name="P2"><text:span text:style-name="T8">1Ch 6:2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8" draw:text-style-name="P6" xml:id="id14" draw:id="id14" draw:layer="layout" svg:width="2.54cm" svg:height="1.27cm" svg:x="11.926cm" svg:y="41.24cm">
          <draw:glue-point draw:id="8" svg:x="2.77cm" svg:y="-5.239cm"/>
          <text:p text:style-name="P2"><text:span text:style-name="T1">Uzziah</text:span></text:p>
          <text:p text:style-name="P2"><text:span text:style-name="T8">1Ch 6:2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9" draw:text-style-name="P6" xml:id="id18" draw:id="id18" draw:layer="layout" svg:width="2.54cm" svg:height="1.27cm" svg:x="11.929cm" svg:y="42.771cm">
          <draw:glue-point draw:id="8" svg:x="2.77cm" svg:y="-5.239cm"/>
          <text:p text:style-name="P2"><text:span text:style-name="T1">Shaul</text:span></text:p>
          <text:p text:style-name="P2"><text:span text:style-name="T8">1Ch 6:24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7" draw:text-style-name="P1" draw:layer="layout" draw:type="curve" svg:x1="13.195cm" svg:y1="41.009cm" svg:x2="13.196cm" svg:y2="41.24cm" draw:start-shape="id13" draw:start-glue-point="2" draw:end-shape="id14" draw:end-glue-point="0" svg:d="M13195 41009c0 174 1 59 1 231" svg:viewBox="0 0 2 232">
          <text:p/>
        </draw:connector>
        <draw:connector draw:style-name="gr17" draw:text-style-name="P1" draw:layer="layout" draw:type="curve" svg:x1="13.196cm" svg:y1="39.435cm" svg:x2="13.195cm" svg:y2="39.739cm" draw:start-shape="id15" draw:start-glue-point="2" draw:end-shape="id13" draw:end-glue-point="0" svg:d="M13196 39435c0 229-1 78-1 304" svg:viewBox="0 0 2 305">
          <text:p/>
        </draw:connector>
        <draw:connector draw:style-name="gr17" draw:text-style-name="P1" draw:layer="layout" draw:type="curve" svg:x1="13.195cm" svg:y1="37.834cm" svg:x2="13.196cm" svg:y2="38.165cm" draw:start-shape="id16" draw:start-glue-point="2" draw:end-shape="id15" draw:end-glue-point="0" svg:d="M13195 37834c0 249 1 84 1 331" svg:viewBox="0 0 2 332">
          <text:p/>
        </draw:connector>
        <draw:connector draw:style-name="gr17" draw:text-style-name="P1" draw:layer="layout" draw:type="curve" svg:x1="13.193cm" svg:y1="36.25cm" svg:x2="13.195cm" svg:y2="36.564cm" draw:start-shape="id17" draw:start-glue-point="2" draw:end-shape="id16" draw:end-glue-point="0" svg:d="M13193 36250c0 237 2 80 2 314" svg:viewBox="0 0 3 315">
          <text:p/>
        </draw:connector>
        <draw:custom-shape draw:style-name="gr30" draw:text-style-name="P6" xml:id="id31" draw:id="id31" draw:layer="layout" svg:width="2.54cm" svg:height="1.27cm" svg:x="6.524cm" svg:y="34.981cm">
          <draw:glue-point draw:id="8" svg:x="2.77cm" svg:y="-5.239cm"/>
          <text:p text:style-name="P2"><text:span text:style-name="T1">Amasai</text:span></text:p>
          <text:p text:style-name="P2"><text:span text:style-name="T8">1Ch 6:25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1" draw:text-style-name="P6" xml:id="id30" draw:id="id30" draw:layer="layout" svg:width="2.54cm" svg:height="1.27cm" svg:x="9.224cm" svg:y="34.981cm">
          <draw:glue-point draw:id="8" svg:x="2.77cm" svg:y="-5.239cm"/>
          <text:p text:style-name="P2"><text:span text:style-name="T1">Ahimoth</text:span></text:p>
          <text:p text:style-name="P2"><text:span text:style-name="T8">1Ch 6:25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7" draw:text-style-name="P1" draw:layer="layout" draw:type="curve" svg:x1="13.196cm" svg:y1="42.51cm" svg:x2="13.199cm" svg:y2="42.771cm" draw:start-shape="id14" draw:start-glue-point="2" draw:end-shape="id18" draw:end-glue-point="0" svg:d="M13196 42510c0 196 3 66 3 261" svg:viewBox="0 0 4 262">
          <text:p/>
        </draw:connector>
        <draw:custom-shape draw:style-name="gr32" draw:text-style-name="P6" xml:id="id19" draw:id="id19" draw:layer="layout" svg:width="2.54cm" svg:height="2.44cm" svg:x="5.147cm" svg:y="49.992cm">
          <draw:glue-point draw:id="8" svg:x="2.77cm" svg:y="-5.239cm"/>
          <text:p text:style-name="P2"><text:span text:style-name="T1">Joel</text:span></text:p>
          <text:p text:style-name="P2"><text:span text:style-name="T5">1Sa 8:2, 1Ch 6:33</text:span></text:p>
          <text:p text:style-name="P2"><text:span text:style-name="T1">Vashni</text:span></text:p>
          <text:p text:style-name="P2"><text:span text:style-name="T5">1Ch 6:28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3" draw:text-style-name="P6" xml:id="id20" draw:id="id20" draw:layer="layout" svg:width="2.54cm" svg:height="1.27cm" svg:x="5.152cm" svg:y="53.03cm">
          <draw:glue-point draw:id="8" svg:x="2.77cm" svg:y="-5.239cm"/>
          <text:p text:style-name="P2"><text:span text:style-name="T1">Heman</text:span></text:p>
          <text:p text:style-name="P2"><text:span text:style-name="T5">1Ch 6:33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6" draw:text-style-name="P1" draw:layer="layout" draw:type="curve" svg:x1="6.414cm" svg:y1="48.864cm" svg:x2="6.417cm" svg:y2="49.992cm" draw:start-shape="id2" draw:start-glue-point="2" draw:end-shape="id19" draw:end-glue-point="0" svg:d="M6414 48864c0 867 3 303 3 1128" svg:viewBox="0 0 4 1129">
          <text:p/>
        </draw:connector>
        <draw:connector draw:style-name="gr16" draw:text-style-name="P1" draw:layer="layout" draw:type="curve" svg:x1="6.417cm" svg:y1="52.432cm" svg:x2="6.422cm" svg:y2="53.03cm" draw:start-shape="id19" draw:start-glue-point="2" draw:end-shape="id20" draw:end-glue-point="0" svg:d="M6417 52432c0 450 5 151 5 598" svg:viewBox="0 0 6 599">
          <text:p/>
        </draw:connector>
        <draw:custom-shape draw:style-name="gr34" draw:text-style-name="P6" xml:id="id40" draw:id="id40" draw:layer="layout" svg:width="2.54cm" svg:height="1.27cm" svg:x="7.835cm" svg:y="30.563cm">
          <draw:glue-point draw:id="8" svg:x="2.77cm" svg:y="-5.239cm"/>
          <text:p text:style-name="P2"><text:span text:style-name="T1">Mahath</text:span></text:p>
          <text:p text:style-name="P2"><text:span text:style-name="T5">1Ch 6:35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5" draw:text-style-name="P6" xml:id="id39" draw:id="id39" draw:layer="layout" svg:width="2.54cm" svg:height="1.27cm" svg:x="7.835cm" svg:y="28.975cm">
          <draw:glue-point draw:id="8" svg:x="2.77cm" svg:y="-5.239cm"/>
          <text:p text:style-name="P2"><text:span text:style-name="T1">Amasai</text:span></text:p>
          <text:p text:style-name="P2"><text:span text:style-name="T5">1Ch 6:35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" draw:text-style-name="P1" draw:layer="layout" draw:type="curve" svg:x1="9.629cm" svg:y1="3.505cm" svg:x2="9.631cm" svg:y2="4.398cm" draw:start-shape="id21" draw:start-glue-point="2" draw:end-shape="id22" draw:end-glue-point="0" svg:d="M9629 3505c0 670 2 224 2 893" svg:viewBox="0 0 3 894">
          <text:p/>
        </draw:connector>
        <draw:connector draw:style-name="gr9" draw:text-style-name="P1" xml:id="id3" draw:id="id3" draw:layer="layout" draw:type="curve" svg:x1="6.747cm" svg:y1="5.294cm" svg:x2="7.931cm" svg:y2="5.294cm" draw:start-shape="id23" draw:start-glue-point="7" draw:end-shape="id22" draw:end-glue-point="5" svg:d="M6747 5294h1184" svg:viewBox="0 0 1185 1">
          <text:p/>
        </draw:connector>
        <draw:connector draw:style-name="gr16" draw:text-style-name="P1" draw:layer="layout" draw:type="curve" svg:x1="9.104cm" svg:y1="33.428cm" svg:x2="13.193cm" svg:y2="34.98cm" draw:start-shape="id24" draw:start-glue-point="2" draw:end-shape="id17" draw:end-glue-point="0" svg:d="M9104 33428c0 1165 4089 390 4089 1552" svg:viewBox="0 0 4090 1553">
          <text:p/>
        </draw:connector>
        <draw:connector draw:style-name="gr1" draw:text-style-name="P1" draw:layer="layout" draw:type="curve" svg:x1="7.336cm" svg:y1="7.468cm" svg:x2="7.338cm" svg:y2="7.797cm" draw:start-shape="id4" draw:start-glue-point="2" draw:end-shape="id25" draw:end-glue-point="0" svg:d="M7336 7468c0 247 2 83 2 329" svg:viewBox="0 0 3 330">
          <text:p/>
        </draw:connector>
        <draw:connector draw:style-name="gr9" draw:text-style-name="P1" xml:id="id5" draw:id="id5" draw:layer="layout" draw:type="curve" svg:x1="8.722cm" svg:y1="8.693cm" svg:x2="9.442cm" svg:y2="8.691cm" draw:start-shape="id25" draw:start-glue-point="7" draw:end-shape="id26" draw:end-glue-point="5" svg:d="M8722 8693c541 0 182-2 720-2" svg:viewBox="0 0 721 3">
          <text:p/>
        </draw:connector>
        <draw:connector draw:style-name="gr1" draw:text-style-name="P1" draw:layer="layout" draw:type="curve" svg:x1="9.09cm" svg:y1="11.312cm" svg:x2="9.086cm" svg:y2="11.677cm" draw:start-shape="id6" draw:start-glue-point="2" draw:end-shape="id27" draw:end-glue-point="0" svg:d="M9090 11312c0 280-4 98-4 365" svg:viewBox="0 0 5 366">
          <text:p/>
        </draw:connector>
        <draw:connector draw:style-name="gr1" draw:text-style-name="P1" draw:layer="layout" draw:type="curve" svg:x1="9.086cm" svg:y1="12.947cm" svg:x2="9.089cm" svg:y2="13.215cm" draw:start-shape="id27" draw:start-glue-point="2" draw:end-shape="id28" draw:end-glue-point="0" svg:d="M9086 12947c0 201 3 67 3 268" svg:viewBox="0 0 4 269">
          <text:p/>
        </draw:connector>
        <draw:connector draw:style-name="gr1" draw:text-style-name="P1" draw:layer="layout" draw:type="curve" svg:x1="9.089cm" svg:y1="15.12cm" svg:x2="9.092cm" svg:y2="15.55cm" draw:start-shape="id28" draw:start-glue-point="2" draw:end-shape="id29" draw:end-glue-point="0" svg:d="M9089 15120c0 322 3 108 3 430" svg:viewBox="0 0 4 431">
          <text:p/>
        </draw:connector>
        <draw:connector draw:style-name="gr16" draw:text-style-name="P1" draw:layer="layout" draw:type="curve" svg:x1="9.104cm" svg:y1="33.428cm" svg:x2="10.494cm" svg:y2="34.981cm" draw:start-shape="id24" draw:start-glue-point="2" draw:end-shape="id30" draw:end-glue-point="0" svg:d="M9104 33428c0 1165 1390 389 1390 1553" svg:viewBox="0 0 1391 1554">
          <text:p/>
        </draw:connector>
        <draw:connector draw:style-name="gr16" draw:text-style-name="P1" draw:layer="layout" draw:type="curve" svg:x1="9.104cm" svg:y1="33.428cm" svg:x2="7.794cm" svg:y2="34.981cm" draw:start-shape="id24" draw:start-glue-point="2" draw:end-shape="id31" draw:end-glue-point="0" svg:d="M9104 33428c0 1165-1310 389-1310 1553" svg:viewBox="0 0 1311 1554">
          <text:p/>
        </draw:connector>
        <draw:connector draw:style-name="gr16" draw:text-style-name="P1" draw:layer="layout" draw:type="curve" svg:x1="9.104cm" svg:y1="33.428cm" svg:x2="4.936cm" svg:y2="34.981cm" draw:start-shape="id24" draw:start-glue-point="2" draw:end-shape="id12" draw:end-glue-point="0" svg:d="M9104 33428c0 1165-4168 389-4168 1553" svg:viewBox="0 0 4169 1554">
          <text:p/>
        </draw:connector>
        <draw:custom-shape draw:style-name="gr36" draw:text-style-name="P6" xml:id="id32" draw:id="id32" draw:layer="layout" svg:width="2.54cm" svg:height="1.27cm" svg:x="7.82cm" svg:y="17.075cm">
          <draw:glue-point draw:id="8" svg:x="2.77cm" svg:y="-5.239cm"/>
          <text:p text:style-name="P2"><text:span text:style-name="T1">Ebiasaph</text:span></text:p>
          <text:p text:style-name="P2"><text:span text:style-name="T5">1Ch 6:37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" draw:text-style-name="P1" draw:layer="layout" draw:type="curve" svg:x1="9.092cm" svg:y1="16.82cm" svg:x2="9.09cm" svg:y2="17.075cm" draw:start-shape="id29" draw:start-glue-point="2" draw:end-shape="id32" draw:end-glue-point="0" svg:d="M9092 16820c0 192-2 65-2 255" svg:viewBox="0 0 3 256">
          <text:p/>
        </draw:connector>
        <draw:connector draw:style-name="gr1" draw:text-style-name="P1" draw:layer="layout" draw:type="curve" svg:x1="9.09cm" svg:y1="18.345cm" svg:x2="9.095cm" svg:y2="18.758cm" draw:start-shape="id32" draw:start-glue-point="2" draw:end-shape="id33" draw:end-glue-point="0" svg:d="M9090 18345c0 310 5 104 5 413" svg:viewBox="0 0 6 414">
          <text:p/>
        </draw:connector>
        <draw:custom-shape draw:style-name="gr37" draw:text-style-name="P6" xml:id="id38" draw:id="id38" draw:layer="layout" svg:width="2.54cm" svg:height="1.27cm" svg:x="7.832cm" svg:y="27.233cm">
          <draw:glue-point draw:id="8" svg:x="2.77cm" svg:y="-5.239cm"/>
          <text:p text:style-name="P2"><text:span text:style-name="T1">Elkanah</text:span></text:p>
          <text:p text:style-name="P2"><text:span text:style-name="T5">1Ch 6:36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8" draw:text-style-name="P6" xml:id="id37" draw:id="id37" draw:layer="layout" svg:width="2.54cm" svg:height="1.27cm" svg:x="7.831cm" svg:y="25.645cm">
          <draw:glue-point draw:id="8" svg:x="2.77cm" svg:y="-5.239cm"/>
          <text:p text:style-name="P2"><text:span text:style-name="T1">Joel</text:span></text:p>
          <text:p text:style-name="P2"><text:span text:style-name="T5">1Ch 6:36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9" draw:text-style-name="P6" xml:id="id36" draw:id="id36" draw:layer="layout" svg:width="2.54cm" svg:height="1.27cm" svg:x="7.83cm" svg:y="24.043cm">
          <draw:glue-point draw:id="8" svg:x="2.77cm" svg:y="-5.239cm"/>
          <text:p text:style-name="P2"><text:span text:style-name="T1">Azariah</text:span></text:p>
          <text:p text:style-name="P2"><text:span text:style-name="T5">1Ch 6:36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0" draw:text-style-name="P6" xml:id="id35" draw:id="id35" draw:layer="layout" svg:width="2.858cm" svg:height="1.27cm" svg:x="7.668cm" svg:y="22.355cm">
          <draw:glue-point draw:id="8" svg:x="2.77cm" svg:y="-5.239cm"/>
          <text:p text:style-name="P2"><text:span text:style-name="T1">Zephaniah</text:span></text:p>
          <text:p text:style-name="P2"><text:span text:style-name="T5">1Ch 6:36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1" draw:text-style-name="P6" xml:id="id34" draw:id="id34" draw:layer="layout" svg:width="2.54cm" svg:height="1.27cm" svg:x="7.826cm" svg:y="20.668cm">
          <draw:glue-point draw:id="8" svg:x="2.77cm" svg:y="-5.239cm"/>
          <text:p text:style-name="P2"><text:span text:style-name="T1">Tahath</text:span></text:p>
          <text:p text:style-name="P2"><text:span text:style-name="T5">1Ch 6:37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" draw:text-style-name="P1" draw:layer="layout" draw:type="curve" svg:x1="9.095cm" svg:y1="20.25cm" svg:x2="9.096cm" svg:y2="20.668cm" draw:start-shape="id33" draw:start-glue-point="2" draw:end-shape="id34" draw:end-glue-point="0" svg:d="M9095 20250c0 315 1 106 1 418" svg:viewBox="0 0 2 419">
          <text:p/>
        </draw:connector>
        <draw:connector draw:style-name="gr1" draw:text-style-name="P1" draw:layer="layout" draw:type="curve" svg:x1="9.096cm" svg:y1="21.938cm" svg:x2="9.097cm" svg:y2="22.355cm" draw:start-shape="id34" draw:start-glue-point="2" draw:end-shape="id35" draw:end-glue-point="0" svg:d="M9096 21938c0 313 1 105 1 417" svg:viewBox="0 0 2 418">
          <text:p/>
        </draw:connector>
        <draw:connector draw:style-name="gr1" draw:text-style-name="P1" draw:layer="layout" draw:type="curve" svg:x1="9.097cm" svg:y1="23.625cm" svg:x2="9.1cm" svg:y2="24.043cm" draw:start-shape="id35" draw:start-glue-point="2" draw:end-shape="id36" draw:end-glue-point="0" svg:d="M9097 23625c0 315 3 106 3 418" svg:viewBox="0 0 4 419">
          <text:p/>
        </draw:connector>
        <draw:connector draw:style-name="gr1" draw:text-style-name="P1" draw:layer="layout" draw:type="curve" svg:x1="9.1cm" svg:y1="25.313cm" svg:x2="9.101cm" svg:y2="25.645cm" draw:start-shape="id36" draw:start-glue-point="2" draw:end-shape="id37" draw:end-glue-point="0" svg:d="M9100 25313c0 250 1 85 1 332" svg:viewBox="0 0 2 333">
          <text:p/>
        </draw:connector>
        <draw:connector draw:style-name="gr1" draw:text-style-name="P1" draw:layer="layout" draw:type="curve" svg:x1="9.101cm" svg:y1="26.915cm" svg:x2="9.102cm" svg:y2="27.233cm" draw:start-shape="id37" draw:start-glue-point="2" draw:end-shape="id38" draw:end-glue-point="0" svg:d="M9101 26915c0 240 1 81 1 318" svg:viewBox="0 0 2 319">
          <text:p/>
        </draw:connector>
        <draw:connector draw:style-name="gr1" draw:text-style-name="P1" draw:layer="layout" draw:type="curve" svg:x1="9.102cm" svg:y1="28.503cm" svg:x2="9.105cm" svg:y2="28.975cm" draw:start-shape="id38" draw:start-glue-point="2" draw:end-shape="id39" draw:end-glue-point="0" svg:d="M9102 28503c0 355 3 120 3 472" svg:viewBox="0 0 4 473">
          <text:p/>
        </draw:connector>
        <draw:connector draw:style-name="gr1" draw:text-style-name="P1" draw:layer="layout" draw:type="curve" svg:x1="9.105cm" svg:y1="30.245cm" svg:x2="9.105cm" svg:y2="30.563cm" draw:start-shape="id39" draw:start-glue-point="2" draw:end-shape="id40" draw:end-glue-point="0" svg:d="M9105 30245v318" svg:viewBox="0 0 1 319">
          <text:p/>
        </draw:connector>
        <draw:connector draw:style-name="gr1" draw:text-style-name="P1" draw:layer="layout" draw:type="curve" svg:x1="9.105cm" svg:y1="31.833cm" svg:x2="9.104cm" svg:y2="32.158cm" draw:start-shape="id40" draw:start-glue-point="2" draw:end-shape="id24" draw:end-glue-point="0" svg:d="M9105 31833c0 244-1 82-1 325" svg:viewBox="0 0 2 326">
          <text:p/>
        </draw:connector>
        <draw:custom-shape draw:style-name="gr42" draw:text-style-name="P6" xml:id="id41" draw:id="id41" draw:layer="layout" svg:width="2.54cm" svg:height="1.27cm" svg:x="8.045cm" svg:y="50.005cm">
          <draw:glue-point draw:id="8" svg:x="2.77cm" svg:y="-5.239cm"/>
          <text:p text:style-name="P2"><text:span text:style-name="T1">Abiah</text:span></text:p>
          <text:p text:style-name="P2"><text:span text:style-name="T5">1Ch 6:28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6" draw:text-style-name="P1" draw:layer="layout" draw:type="curve" svg:x1="6.414cm" svg:y1="48.864cm" svg:x2="9.315cm" svg:y2="50.005cm" draw:start-shape="id2" draw:start-glue-point="2" draw:end-shape="id41" draw:end-glue-point="0" svg:d="M6414 48864c0 876 2901 306 2901 1141" svg:viewBox="0 0 2902 1142">
          <text:p/>
        </draw:connector>
        <draw:connector draw:style-name="gr16" draw:text-style-name="P1" draw:layer="layout" draw:type="curve" svg:x1="4.936cm" svg:y1="44.866cm" svg:x2="4.938cm" svg:y2="45.172cm" draw:start-shape="id10" draw:start-glue-point="2" draw:end-shape="id7" draw:end-glue-point="0" svg:d="M4936 44866c0 231 2 78 2 306" svg:viewBox="0 0 3 307">
          <text:p/>
        </draw:connector>
        <draw:custom-shape draw:style-name="gr43" draw:text-style-name="P8" draw:layer="layout" svg:width="4.762cm" svg:height="2.222cm" svg:x="1.778cm" svg:y="1.143cm">
          <text:p text:style-name="P7"><text:span text:style-name="T9">WARNING</text:span></text:p>
          <text:p text:style-name="P7"><text:span text:style-name="T9">THIS IS NOT COMPLE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7.78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3T14:51:03.519000000</meta:creation-date>
    <dc:date>2026-07-11T12:31:58.210398123</dc:date>
    <meta:editing-duration>PT18M6S</meta:editing-duration>
    <meta:editing-cycles>17</meta:editing-cycles>
    <meta:generator>LibreOffice/26.2.4.2$Linux_X86_64 LibreOffice_project/64a984c51f4702dbd3710b13428c673a2f1292e7</meta:generator>
    <dc:title>Samuel genealogy</dc:title>
    <meta:print-date>2025-08-07T11:42:25.171929000</meta:print-date>
    <meta:printed-by>PDF files</meta:printed-by>
    <meta:document-statistic meta:object-count="76"/>
  </office:meta>
</office:document-meta>
</file>