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ystem" style:font-pitch="variable"/>
    <style:font-face style:name="Gabriela Nerd Font" svg:font-family="'Gabriela Nerd Font'" style:font-adornments="Regular" style:font-pitch="variable"/>
    <style:font-face style:name="Gabriela Nerd Font1" svg:font-family="'Gabriela Nerd 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000000"/>
    </style:style>
    <style:style style:name="gr1" style:family="graphic" style:parent-style-name="objectwithoutfill">
      <style:graphic-properties svg:stroke-width="0.1cm" svg:stroke-color="#ff0000" draw:marker-start-width="0.242cm" draw:marker-end-width="0.242cm" draw:fill="none" draw:textarea-vertical-align="middle" fo:padding-top="0.174cm" fo:padding-bottom="0.174cm" fo:padding-left="0.299cm" fo:padding-right="0.299cm" loext:decorative="false"/>
    </style:style>
    <style:style style:name="gr2" style:family="graphic" style:parent-style-name="objectwithoutfill">
      <style:graphic-properties draw:stroke="solid" draw:stroke-dash="Dot" svg:stroke-width="0.1cm" svg:stroke-color="#ff0000" draw:marker-start-width="0.242cm" draw:marker-end-width="0.242cm" svg:stroke-linecap="butt" draw:fill="none" draw:textarea-vertical-align="middle" fo:padding-top="0.174cm" fo:padding-bottom="0.174cm" fo:padding-left="0.299cm" fo:padding-right="0.299cm" loext:decorative="false"/>
    </style:style>
    <style:style style:name="gr3" style:family="graphic" style:parent-style-name="objectwithoutfill">
      <style:graphic-properties svg:stroke-width="0.1cm" svg:stroke-color="#ffb66c" draw:marker-start-width="0.242cm" draw:marker-end-width="0.242cm" draw:fill="none" draw:textarea-vertical-align="middle" fo:padding-top="0.174cm" fo:padding-bottom="0.174cm" fo:padding-left="0.299cm" fo:padding-right="0.299cm" loext:decorative="false"/>
    </style:style>
    <style:style style:name="gr4" style:family="graphic" style:parent-style-name="standard">
      <style:graphic-properties draw:textarea-horizontal-align="justify" draw:textarea-vertical-align="middle" draw:auto-grow-height="false" fo:min-height="2.042cm" fo:min-width="2.3cm" style:writing-mode="lr-tb" loext:decorative="false"/>
      <style:paragraph-properties style:writing-mode="lr-tb"/>
    </style:style>
    <style:style style:name="gr5" style:family="graphic" style:parent-style-name="standard">
      <style:graphic-properties draw:textarea-horizontal-align="justify" draw:textarea-vertical-align="middle" draw:auto-grow-height="false" fo:min-height="2.042cm" fo:min-width="2.402cm" style:writing-mode="lr-tb" loext:decorative="false"/>
      <style:paragraph-properties style:writing-mode="lr-tb"/>
    </style:style>
    <style:style style:name="gr6" style:family="graphic" style:parent-style-name="standard">
      <style:graphic-properties draw:textarea-horizontal-align="justify" draw:textarea-vertical-align="middle" draw:auto-grow-height="false" fo:min-height="2.604cm" fo:min-width="2.252cm" style:writing-mode="lr-tb" loext:decorative="false"/>
      <style:paragraph-properties style:writing-mode="lr-tb"/>
    </style:style>
    <style:style style:name="gr7" style:family="graphic" style:parent-style-name="objectwithoutfill">
      <style:graphic-properties draw:stroke="dash" draw:stroke-dash="Dot" svg:stroke-width="0.1cm" svg:stroke-color="#ff0000" draw:marker-start-width="0.242cm" draw:marker-end-width="0.242cm" svg:stroke-linecap="butt" draw:fill="none" draw:textarea-vertical-align="middle" fo:padding-top="0.174cm" fo:padding-bottom="0.174cm" fo:padding-left="0.299cm" fo:padding-right="0.299cm" loext:decorative="false"/>
    </style:style>
    <style:style style:name="gr8" style:family="graphic" style:parent-style-name="objectwithoutfill">
      <style:graphic-properties draw:stroke="dash" draw:stroke-dash="Dot" svg:stroke-width="0.1cm" svg:stroke-color="#ffb66c" draw:marker-start-width="0.242cm" draw:marker-end-width="0.242cm" svg:stroke-linecap="butt" draw:fill="none" draw:textarea-vertical-align="middle" fo:padding-top="0.174cm" fo:padding-bottom="0.174cm" fo:padding-left="0.299cm" fo:padding-right="0.299cm" loext:decorative="false"/>
    </style:style>
    <style:style style:name="gr9" style:family="graphic" style:parent-style-name="standard">
      <style:graphic-properties svg:stroke-color="#729fcf" draw:fill="solid" draw:fill-color="#ffb66c" draw:textarea-horizontal-align="justify" draw:textarea-vertical-align="middle" draw:auto-grow-height="false" fo:min-height="2.042cm" fo:min-width="2.3cm" style:writing-mode="lr-tb" loext:decorative="false"/>
      <style:paragraph-properties style:writing-mode="lr-tb"/>
    </style:style>
    <style:style style:name="gr10" style:family="graphic" style:parent-style-name="standard">
      <style:graphic-properties svg:stroke-color="#729fcf" draw:textarea-horizontal-align="justify" draw:textarea-vertical-align="middle" draw:auto-grow-height="false" fo:min-height="2.042cm" fo:min-width="2.3cm" style:writing-mode="lr-tb" loext:decorative="false"/>
      <style:paragraph-properties style:writing-mode="lr-tb"/>
    </style:style>
    <style:style style:name="gr11" style:family="graphic" style:parent-style-name="standard">
      <style:graphic-properties draw:textarea-horizontal-align="justify" draw:textarea-vertical-align="middle" draw:auto-grow-height="false" fo:min-height="2.042cm" fo:min-width="2.503cm" style:writing-mode="lr-tb" loext:decorative="false"/>
      <style:paragraph-properties style:writing-mode="lr-tb"/>
    </style:style>
    <style:style style:name="gr12" style:family="graphic" style:parent-style-name="standard">
      <style:graphic-properties draw:textarea-horizontal-align="justify" draw:textarea-vertical-align="middle" draw:auto-grow-height="false" fo:min-height="5.032cm" fo:min-width="2.344cm" style:writing-mode="lr-tb" loext:decorative="false"/>
      <style:paragraph-properties style:writing-mode="lr-tb"/>
    </style:style>
    <style:style style:name="gr13" style:family="graphic" style:parent-style-name="standard" style:list-style-name="L1">
      <style:graphic-properties svg:stroke-color="#729fcf" draw:fill-color="#ffb66c" draw:textarea-horizontal-align="justify" draw:textarea-vertical-align="middle" draw:auto-grow-height="false" fo:min-height="2.042cm" fo:min-width="2.3cm" style:writing-mode="lr-tb" loext:decorative="false"/>
      <style:paragraph-properties style:writing-mode="lr-tb"/>
    </style:style>
    <style:style style:name="gr14" style:family="graphic" style:parent-style-name="standard" style:list-style-name="L1">
      <style:graphic-properties svg:stroke-color="#729fcf" draw:fill-color="#ffb66c" draw:textarea-horizontal-align="justify" draw:textarea-vertical-align="middle" draw:auto-grow-height="false" fo:min-height="2.042cm" fo:min-width="2.3cm" style:writing-mode="lr-tb" loext:decorative="false"/>
      <style:paragraph-properties style:writing-mode="lr-tb"/>
    </style:style>
    <style:style style:name="gr15" style:family="graphic" style:parent-style-name="standard" style:list-style-name="L1">
      <style:graphic-properties svg:stroke-color="#729fcf" draw:fill-color="#ffb66c" draw:textarea-horizontal-align="justify" draw:textarea-vertical-align="middle" draw:auto-grow-height="false" fo:min-height="2.042cm" fo:min-width="2.351cm" style:writing-mode="lr-tb" loext:decorative="false"/>
      <style:paragraph-properties style:writing-mode="lr-tb"/>
    </style:style>
    <style:style style:name="gr16" style:family="graphic" style:parent-style-name="standard" style:list-style-name="L1">
      <style:graphic-properties svg:stroke-color="#729fcf" draw:fill-color="#ffb66c" draw:textarea-horizontal-align="justify" draw:textarea-vertical-align="middle" draw:auto-grow-height="false" fo:min-height="2.042cm" fo:min-width="2.3cm" style:writing-mode="lr-tb" loext:decorative="false"/>
      <style:paragraph-properties style:writing-mode="lr-tb"/>
    </style:style>
    <style:style style:name="gr17" style:family="graphic" style:parent-style-name="standard" style:list-style-name="L1">
      <style:graphic-properties svg:stroke-color="#729fcf" draw:fill-color="#ffb66c" draw:textarea-horizontal-align="justify" draw:textarea-vertical-align="middle" draw:auto-grow-height="false" fo:min-height="2.042cm" fo:min-width="2.3cm" style:writing-mode="lr-tb" loext:decorative="false"/>
      <style:paragraph-properties style:writing-mode="lr-tb"/>
    </style:style>
    <style:style style:name="gr18" style:family="graphic" style:parent-style-name="standard" style:list-style-name="L1">
      <style:graphic-properties svg:stroke-color="#729fcf" draw:fill-color="#ffb66c" draw:textarea-horizontal-align="justify" draw:textarea-vertical-align="middle" draw:auto-grow-height="false" fo:min-height="2.685cm" fo:min-width="2.435cm" style:writing-mode="lr-tb" loext:decorative="false"/>
      <style:paragraph-properties style:writing-mode="lr-tb"/>
    </style:style>
    <style:style style:name="gr19" style:family="graphic" style:parent-style-name="objectwithoutfill">
      <style:graphic-properties svg:stroke-width="0.1cm" svg:stroke-color="#ff0000" draw:marker-start-width="0.2cm" draw:marker-end-width="0.2cm" draw:fill="none" draw:textarea-vertical-align="middle" fo:padding-top="0.174cm" fo:padding-bottom="0.174cm" fo:padding-left="0.299cm" fo:padding-right="0.299cm" loext:decorative="false"/>
    </style:style>
    <style:style style:name="gr20" style:family="graphic" style:parent-style-name="objectwithoutfill">
      <style:graphic-properties svg:stroke-width="0.1cm" svg:stroke-color="#ffb66c" draw:marker-start-width="0.2cm" draw:marker-end-width="0.2cm" draw:fill="none" draw:textarea-vertical-align="middle" fo:padding-top="0.174cm" fo:padding-bottom="0.174cm" fo:padding-left="0.299cm" fo:padding-right="0.299cm" loext:decorative="false"/>
    </style:style>
    <style:style style:name="gr21" style:family="graphic" style:parent-style-name="objectwithoutfill">
      <style:graphic-properties svg:stroke-width="0.1cm" svg:stroke-color="#ffb66c" draw:marker-start-width="0.19cm" draw:marker-end-width="0.19cm" draw:fill="none" draw:textarea-vertical-align="middle" fo:padding-top="0.174cm" fo:padding-bottom="0.174cm" fo:padding-left="0.299cm" fo:padding-right="0.299cm" loext:decorative="false"/>
    </style:style>
    <style:style style:name="gr22" style:family="graphic" style:parent-style-name="objectwithoutfill">
      <style:graphic-properties draw:stroke="dash" draw:stroke-dash="Dot" svg:stroke-width="0.1cm" svg:stroke-color="#ff0000" draw:marker-start-width="0.2cm" draw:marker-end-width="0.2cm" svg:stroke-linecap="butt" draw:fill="none" draw:textarea-vertical-align="middle" fo:padding-top="0.174cm" fo:padding-bottom="0.174cm" fo:padding-left="0.299cm" fo:padding-right="0.299cm" loext:decorative="false"/>
    </style:style>
    <style:style style:name="gr23" style:family="graphic" style:parent-style-name="standard">
      <style:graphic-properties svg:stroke-color="#729fcf" draw:fill="solid" draw:fill-color="#ffb66c" draw:textarea-horizontal-align="justify" draw:textarea-vertical-align="middle" draw:auto-grow-height="false" fo:min-height="3.117cm" fo:min-width="2.252cm" style:writing-mode="lr-tb" loext:decorative="false"/>
      <style:paragraph-properties style:writing-mode="lr-tb"/>
    </style:style>
    <style:style style:name="gr24" style:family="graphic" style:parent-style-name="standard">
      <style:graphic-properties svg:stroke-color="#729fcf" draw:fill="solid" draw:fill-color="#ffb66c" draw:textarea-horizontal-align="justify" draw:textarea-vertical-align="middle" draw:auto-grow-height="false" fo:min-height="2.042cm" fo:min-width="2.605cm" style:writing-mode="lr-tb" loext:decorative="false"/>
      <style:paragraph-properties style:writing-mode="lr-tb"/>
    </style:style>
    <style:style style:name="gr25" style:family="graphic" style:parent-style-name="standard">
      <style:graphic-properties draw:textarea-horizontal-align="justify" draw:textarea-vertical-align="middle" draw:auto-grow-height="false" fo:min-height="2.364cm" fo:min-width="2.317cm" style:writing-mode="lr-tb" loext:decorative="false"/>
      <style:paragraph-properties style:writing-mode="lr-tb"/>
    </style:style>
    <style:style style:name="gr26" style:family="graphic" style:parent-style-name="standard" style:list-style-name="L1">
      <style:graphic-properties draw:textarea-horizontal-align="justify" draw:textarea-vertical-align="middle" draw:auto-grow-height="false" fo:min-height="2.552cm" fo:min-width="2.252cm" style:writing-mode="lr-tb" loext:decorative="false"/>
      <style:paragraph-properties style:writing-mode="lr-tb"/>
    </style:style>
    <style:style style:name="gr27" style:family="graphic" style:parent-style-name="standard">
      <style:graphic-properties draw:textarea-horizontal-align="justify" draw:textarea-vertical-align="middle" draw:auto-grow-height="false" fo:min-height="2.486cm" fo:min-width="2.254cm" style:writing-mode="lr-tb" loext:decorative="false"/>
      <style:paragraph-properties style:writing-mode="lr-tb"/>
    </style:style>
    <style:style style:name="gr28" style:family="graphic" style:parent-style-name="standard">
      <style:graphic-properties draw:textarea-horizontal-align="justify" draw:textarea-vertical-align="middle" draw:auto-grow-height="false" fo:min-height="2.042cm" fo:min-width="2.757cm" style:writing-mode="lr-tb" loext:decorative="false"/>
      <style:paragraph-properties style:writing-mode="lr-tb"/>
    </style:style>
    <style:style style:name="gr29" style:family="graphic" style:parent-style-name="objectwithoutfill">
      <style:graphic-properties svg:stroke-width="0.1cm" svg:stroke-color="#800080" draw:marker-start-width="0.242cm" draw:marker-end-width="0.242cm" draw:fill="none" draw:textarea-vertical-align="middle" fo:padding-top="0.174cm" fo:padding-bottom="0.174cm" fo:padding-left="0.299cm" fo:padding-right="0.299cm" loext:decorative="false"/>
    </style:style>
    <style:style style:name="gr30" style:family="graphic" style:parent-style-name="standard">
      <style:graphic-properties draw:fill="solid" draw:fill-color="#ec9ba4" draw:textarea-horizontal-align="justify" draw:textarea-vertical-align="middle" draw:auto-grow-height="false" fo:min-height="2.042cm" fo:min-width="2.3cm" style:writing-mode="lr-tb" loext:decorative="false"/>
      <style:paragraph-properties style:writing-mode="lr-tb"/>
    </style:style>
    <style:style style:name="gr31" style:family="graphic" style:parent-style-name="standard">
      <style:graphic-properties draw:textarea-horizontal-align="justify" draw:textarea-vertical-align="middle" draw:auto-grow-height="false" fo:min-height="2.089cm" fo:min-width="2.448cm" style:writing-mode="lr-tb" loext:decorative="false"/>
      <style:paragraph-properties style:writing-mode="lr-tb"/>
    </style:style>
    <style:style style:name="gr32" style:family="graphic" style:parent-style-name="standard">
      <style:graphic-properties draw:textarea-horizontal-align="justify" draw:textarea-vertical-align="middle" draw:auto-grow-height="false" fo:min-height="2.134cm" fo:min-width="2.747cm" style:writing-mode="lr-tb" loext:decorative="false"/>
      <style:paragraph-properties style:writing-mode="lr-tb"/>
    </style:style>
    <style:style style:name="gr33" style:family="graphic" style:parent-style-name="standard">
      <style:graphic-properties draw:textarea-horizontal-align="justify" draw:textarea-vertical-align="middle" draw:auto-grow-height="false" fo:min-height="2.134cm" fo:min-width="2.442cm" style:writing-mode="lr-tb" loext:decorative="false"/>
      <style:paragraph-properties style:writing-mode="lr-tb"/>
    </style:style>
    <style:style style:name="gr34" style:family="graphic" style:parent-style-name="standard">
      <style:graphic-properties draw:textarea-horizontal-align="justify" draw:textarea-vertical-align="middle" draw:auto-grow-height="false" fo:min-height="2.042cm" fo:min-width="2.351cm" style:writing-mode="lr-tb" loext:decorative="false"/>
      <style:paragraph-properties style:writing-mode="lr-tb"/>
    </style:style>
    <style:style style:name="gr35" style:family="graphic" style:parent-style-name="standard">
      <style:graphic-properties svg:stroke-color="#ffff00" draw:fill="solid" draw:fill-color="#5983b0" draw:textarea-horizontal-align="justify" draw:textarea-vertical-align="middle" draw:auto-grow-height="false" fo:min-height="2.042cm" fo:min-width="2.554cm" style:writing-mode="lr-tb" loext:decorative="false"/>
      <style:paragraph-properties style:writing-mode="lr-tb"/>
    </style:style>
    <style:style style:name="gr36" style:family="graphic" style:parent-style-name="standard">
      <style:graphic-properties draw:textarea-horizontal-align="justify" draw:textarea-vertical-align="middle" draw:auto-grow-height="false" fo:min-height="2.594cm" fo:min-width="2.445cm" style:writing-mode="lr-tb" loext:decorative="false"/>
      <style:paragraph-properties style:writing-mode="lr-tb"/>
    </style:style>
    <style:style style:name="gr37" style:family="graphic" style:parent-style-name="standard">
      <style:graphic-properties draw:textarea-horizontal-align="justify" draw:textarea-vertical-align="middle" draw:auto-grow-height="false" fo:min-height="2.042cm" fo:min-width="2.605cm" style:writing-mode="lr-tb" loext:decorative="false"/>
      <style:paragraph-properties style:writing-mode="lr-tb"/>
    </style:style>
    <style:style style:name="gr38" style:family="graphic" style:parent-style-name="standard">
      <style:graphic-properties svg:stroke-color="#ffff00" draw:fill="solid" draw:fill-color="#5983b0" draw:textarea-horizontal-align="justify" draw:textarea-vertical-align="middle" draw:auto-grow-height="false" fo:min-height="2.042cm" fo:min-width="2.452cm" style:writing-mode="lr-tb" loext:decorative="false"/>
      <style:paragraph-properties style:writing-mode="lr-tb"/>
    </style:style>
    <style:style style:name="gr39" style:family="graphic" style:parent-style-name="standard">
      <style:graphic-properties svg:stroke-color="#ffff00" draw:fill="solid" draw:fill-color="#5983b0" draw:textarea-horizontal-align="justify" draw:textarea-vertical-align="middle" draw:auto-grow-height="false" fo:min-height="2.134cm" fo:min-width="2.798cm" style:writing-mode="lr-tb" loext:decorative="false"/>
      <style:paragraph-properties style:writing-mode="lr-tb"/>
    </style:style>
    <style:style style:name="gr40" style:family="graphic" style:parent-style-name="standard">
      <style:graphic-properties draw:textarea-horizontal-align="justify" draw:textarea-vertical-align="middle" draw:auto-grow-height="false" fo:min-height="2.042cm" fo:min-width="2.808cm" style:writing-mode="lr-tb" loext:decorative="false"/>
      <style:paragraph-properties style:writing-mode="lr-tb"/>
    </style:style>
    <style:style style:name="gr41" style:family="graphic" style:parent-style-name="standard">
      <style:graphic-properties draw:textarea-horizontal-align="justify" draw:textarea-vertical-align="middle" draw:auto-grow-height="false" fo:min-height="2.042cm" fo:min-width="3.316cm" style:writing-mode="lr-tb" loext:decorative="false"/>
      <style:paragraph-properties style:writing-mode="lr-tb"/>
    </style:style>
    <style:style style:name="gr42" style:family="graphic" style:parent-style-name="standard">
      <style:graphic-properties draw:textarea-horizontal-align="justify" draw:textarea-vertical-align="middle" draw:auto-grow-height="false" fo:min-height="2.042cm" fo:min-width="2.706cm" style:writing-mode="lr-tb" loext:decorative="false"/>
      <style:paragraph-properties style:writing-mode="lr-tb"/>
    </style:style>
    <style:style style:name="gr43" style:family="graphic" style:parent-style-name="objectwithoutfill">
      <style:graphic-properties draw:stroke="dash" draw:stroke-dash="Dot" svg:stroke-width="0.1cm" svg:stroke-color="#ff0000" draw:marker-start-width="0.252cm" draw:marker-end-width="0.252cm" svg:stroke-linecap="butt" draw:fill="none" draw:textarea-vertical-align="middle" fo:padding-top="0.174cm" fo:padding-bottom="0.174cm" fo:padding-left="0.299cm" fo:padding-right="0.299cm" loext:decorative="false"/>
    </style:style>
    <style:style style:name="gr44" style:family="graphic" style:parent-style-name="objectwithoutfill">
      <style:graphic-properties draw:stroke="dash" draw:stroke-dash="Dot" svg:stroke-width="0.1cm" svg:stroke-color="#ff0000" draw:marker-start-width="0.242cm" draw:marker-end-width="0.242cm" svg:stroke-linecap="butt" draw:fill="none" draw:textarea-vertical-align="middle" fo:padding-top="0.175cm" fo:padding-bottom="0.175cm" fo:padding-left="0.3cm" fo:padding-right="0.3cm" loext:decorative="false"/>
    </style:style>
    <style:style style:name="gr45"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46"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47" style:family="graphic" style:parent-style-name="objectwithoutfill">
      <style:graphic-properties svg:stroke-width="0.1cm" svg:stroke-color="#ffff00" draw:marker-start-width="0.252cm" draw:marker-end-width="0.252cm" draw:fill="none" draw:textarea-vertical-align="middle" fo:padding-top="0.174cm" fo:padding-bottom="0.174cm" fo:padding-left="0.299cm" fo:padding-right="0.299cm" loext:decorative="false"/>
    </style:style>
    <style:style style:name="gr48"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49"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50" style:family="graphic" style:parent-style-name="objectwithoutfill">
      <style:graphic-properties svg:stroke-width="0.1cm" svg:stroke-color="#800080" draw:marker-start-width="0.252cm" draw:marker-end-width="0.252cm" draw:fill="none" draw:textarea-vertical-align="middle" fo:padding-top="0.174cm" fo:padding-bottom="0.174cm" fo:padding-left="0.299cm" fo:padding-right="0.299cm" loext:decorative="false"/>
    </style:style>
    <style:style style:name="gr51" style:family="graphic" style:parent-style-name="standard">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52"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53" style:family="graphic" style:parent-style-name="standard">
      <style:graphic-properties draw:fill="solid" draw:fill-color="#729fcf" draw:textarea-horizontal-align="justify" draw:textarea-vertical-align="middle" draw:auto-grow-height="false" fo:min-height="2.042cm" fo:min-width="2.3cm" style:writing-mode="lr-tb" loext:decorative="false"/>
      <style:paragraph-properties style:writing-mode="lr-tb"/>
    </style:style>
    <style:style style:name="gr54" style:family="graphic" style:parent-style-name="standard">
      <style:graphic-properties svg:stroke-color="#ffff00" draw:fill="solid" draw:fill-color="#5983b0" draw:textarea-horizontal-align="justify" draw:textarea-vertical-align="middle" draw:auto-grow-height="false" fo:min-height="2.042cm" fo:min-width="2.3cm" style:writing-mode="lr-tb" loext:decorative="false"/>
      <style:paragraph-properties style:writing-mode="lr-tb"/>
    </style:style>
    <style:style style:name="gr55" style:family="graphic" style:parent-style-name="standard">
      <style:graphic-properties draw:fill="solid" draw:fill-color="#999999" draw:textarea-horizontal-align="justify" draw:textarea-vertical-align="middle" draw:auto-grow-height="false" fo:min-height="2.042cm" fo:min-width="2.554cm" style:writing-mode="lr-tb" loext:decorative="false"/>
      <style:paragraph-properties style:writing-mode="lr-tb"/>
    </style:style>
    <style:style style:name="gr56" style:family="graphic" style:parent-style-name="standard" style:list-style-name="L1">
      <style:graphic-properties svg:stroke-color="#729fcf" draw:fill-color="#ffb66c" draw:textarea-horizontal-align="justify" draw:textarea-vertical-align="middle" draw:auto-grow-height="false" fo:min-height="5.194cm" fo:min-width="2.252cm" style:writing-mode="lr-tb" loext:decorative="false"/>
      <style:paragraph-properties style:writing-mode="lr-tb"/>
    </style:style>
    <style:style style:name="gr57" style:family="graphic" style:parent-style-name="standard">
      <style:graphic-properties draw:stroke="none" draw:fill="none" loext:fill-use-slide-background="false" draw:textarea-horizontal-align="justify" draw:textarea-vertical-align="middle" draw:auto-grow-height="false" fo:min-height="6.091cm" fo:min-width="22.55cm" style:writing-mode="lr-tb" loext:decorative="false"/>
      <style:paragraph-properties style:writing-mode="lr-tb"/>
    </style:style>
    <style:style style:name="gr58" style:family="graphic" style:parent-style-name="objectwithoutfill">
      <style:graphic-properties svg:stroke-width="0.1cm" svg:stroke-color="#ff0000" draw:fill="none" draw:textarea-vertical-align="middle" fo:padding-top="0.162cm" fo:padding-bottom="0.162cm" fo:padding-left="0.287cm" fo:padding-right="0.287cm" loext:decorative="false"/>
    </style:style>
    <style:style style:name="gr59" style:family="graphic" style:parent-style-name="standard">
      <style:graphic-properties svg:stroke-color="#ff8000" draw:fill="none" loext:fill-use-slide-background="false" draw:textarea-vertical-align="bottom" draw:auto-grow-height="false" fo:min-height="5.911cm" fo:min-width="2.521cm" style:writing-mode="lr-tb" loext:decorative="false"/>
      <style:paragraph-properties style:writing-mode="lr-tb"/>
    </style:style>
    <style:style style:name="gr60" style:family="graphic" style:parent-style-name="standard">
      <style:graphic-properties draw:fill="solid" draw:fill-color="#ec9ba4" draw:textarea-horizontal-align="justify" draw:textarea-vertical-align="middle" draw:auto-grow-height="false" fo:min-height="2.042cm" fo:min-width="2.554cm" style:writing-mode="lr-tb" loext:decorative="false"/>
      <style:paragraph-properties style:writing-mode="lr-tb"/>
    </style:style>
    <style:style style:name="gr61" style:family="graphic" style:parent-style-name="objectwithoutfill">
      <style:graphic-properties draw:stroke="dash" draw:stroke-dash="Dot" svg:stroke-width="0.1cm" svg:stroke-color="#ff8000" draw:marker-start-width="0.242cm" draw:marker-end-width="0.242cm" svg:stroke-linecap="butt" draw:fill="none" draw:textarea-vertical-align="middle" fo:padding-top="0.175cm" fo:padding-bottom="0.175cm" fo:padding-left="0.3cm" fo:padding-right="0.3cm" loext:decorative="false"/>
    </style:style>
    <style:style style:name="gr62" style:family="graphic" style:parent-style-name="standard">
      <style:graphic-properties svg:stroke-color="#ff8000" draw:fill="none" loext:fill-use-slide-background="false" draw:textarea-horizontal-align="right" draw:textarea-vertical-align="middle" draw:auto-grow-height="false" fo:min-height="2.657cm" fo:min-width="27.122cm" style:writing-mode="lr-tb" loext:decorative="false"/>
      <style:paragraph-properties style:writing-mode="lr-tb"/>
    </style:style>
    <style:style style:name="gr63" style:family="graphic" style:parent-style-name="standard">
      <style:graphic-properties svg:stroke-color="#729fcf" draw:fill="solid" draw:fill-color="#ffb66c" draw:textarea-horizontal-align="justify" draw:textarea-vertical-align="middle" draw:auto-grow-height="false" fo:min-height="2.654cm" fo:min-width="2.252cm" style:writing-mode="lr-tb" loext:decorative="false"/>
      <style:paragraph-properties style:writing-mode="lr-tb"/>
    </style:style>
    <style:style style:name="gr64" style:family="graphic" style:parent-style-name="standard">
      <style:graphic-properties draw:fill="solid" draw:fill-color="#afd095" draw:textarea-horizontal-align="justify" draw:textarea-vertical-align="middle" draw:auto-grow-height="false" fo:min-height="2.042cm" fo:min-width="2.3cm" style:writing-mode="lr-tb" loext:decorative="false"/>
      <style:paragraph-properties style:writing-mode="lr-tb"/>
    </style:style>
    <style:style style:name="gr65" style:family="graphic" style:parent-style-name="objectwithoutfill">
      <style:graphic-properties draw:stroke="dash" draw:stroke-dash="Dot" svg:stroke-width="0.1cm" svg:stroke-color="#afd095" draw:marker-start-width="0.242cm" draw:marker-end-width="0.242cm" svg:stroke-linecap="butt" draw:fill="none" draw:textarea-vertical-align="middle" fo:padding-top="0.175cm" fo:padding-bottom="0.175cm" fo:padding-left="0.3cm" fo:padding-right="0.3cm" loext:decorative="false"/>
    </style:style>
    <style:style style:name="gr66" style:family="graphic" style:parent-style-name="standard">
      <style:graphic-properties svg:stroke-color="#ff8000" draw:fill="none" loext:fill-use-slide-background="false" draw:textarea-horizontal-align="center" draw:textarea-vertical-align="middle" draw:auto-grow-height="false" fo:min-height="4.048cm" fo:min-width="7.925cm" style:writing-mode="lr-tb" loext:decorative="false"/>
      <style:paragraph-properties style:writing-mode="lr-tb"/>
    </style:style>
    <style:style style:name="gr67" style:family="graphic" style:parent-style-name="standard">
      <style:graphic-properties svg:stroke-color="#ff8000" draw:fill="none" loext:fill-use-slide-background="false" draw:textarea-horizontal-align="center" draw:textarea-vertical-align="middle" draw:auto-grow-height="false" fo:min-height="2.409cm" fo:min-width="2.76cm" style:writing-mode="lr-tb" loext:decorative="false"/>
      <style:paragraph-properties style:writing-mode="lr-tb"/>
    </style:style>
    <style:style style:name="gr68" style:family="graphic" style:parent-style-name="objectwithoutfill">
      <style:graphic-properties svg:stroke-color="#ff8000" draw:marker-end="Arrowheads_20_1" draw:marker-end-width="0.3cm" draw:fill="none" draw:textarea-vertical-align="middle" loext:decorative="false"/>
    </style:style>
    <style:style style:name="gr69" style:family="graphic" style:parent-style-name="standard" style:list-style-name="L1">
      <style:graphic-properties svg:stroke-color="#729fcf" draw:fill-color="#ffb66c" draw:textarea-horizontal-align="justify" draw:textarea-vertical-align="middle" draw:auto-grow-height="false" fo:min-height="2.042cm" fo:min-width="2.351cm" style:writing-mode="lr-tb" loext:decorative="false"/>
      <style:paragraph-properties style:writing-mode="lr-tb"/>
    </style:style>
    <style:style style:name="gr70" style:family="graphic" style:parent-style-name="objectwithoutfill">
      <style:graphic-properties draw:stroke="dash" draw:stroke-dash="Dot" svg:stroke-width="0.1cm" svg:stroke-color="#ff8000" draw:marker-start-width="0.252cm" draw:marker-end-width="0.252cm" svg:stroke-linecap="butt" draw:fill="none" draw:textarea-vertical-align="middle" fo:padding-top="0.174cm" fo:padding-bottom="0.174cm" fo:padding-left="0.299cm" fo:padding-right="0.299cm" loext:decorative="false"/>
    </style:style>
    <style:style style:name="gr71" style:family="graphic" style:parent-style-name="standard">
      <style:graphic-properties svg:stroke-color="#ff8000" draw:fill="none" loext:fill-use-slide-background="false" draw:textarea-horizontal-align="center" draw:textarea-vertical-align="middle" draw:auto-grow-height="false" fo:min-height="6.053cm" fo:min-width="9.296cm" style:writing-mode="lr-tb" loext:decorative="false"/>
      <style:paragraph-properties style:writing-mode="lr-tb"/>
    </style:style>
    <style:style style:name="gr72" style:family="graphic" style:parent-style-name="standard" style:list-style-name="L1">
      <style:graphic-properties svg:stroke-color="#ff8000" draw:fill="none" loext:fill-use-slide-background="false" draw:textarea-horizontal-align="justify" draw:textarea-vertical-align="top" draw:auto-grow-height="false" fo:min-height="13.835cm" fo:min-width="9.851cm" style:writing-mode="lr-tb" loext:decorative="false"/>
      <style:paragraph-properties style:writing-mode="lr-tb"/>
    </style:style>
    <style:style style:name="gr73" style:family="graphic" style:parent-style-name="standard" style:list-style-name="L1">
      <style:graphic-properties svg:stroke-color="#ff8000" draw:fill="none" loext:fill-use-slide-background="false" draw:textarea-horizontal-align="justify" draw:textarea-vertical-align="top" draw:auto-grow-height="false" fo:min-height="19.316cm" fo:min-width="33.156cm" style:writing-mode="lr-tb" loext:decorative="false"/>
      <style:paragraph-properties style:writing-mode="lr-tb"/>
    </style:style>
    <style:style style:name="gr74" style:family="graphic" style:parent-style-name="standard" style:list-style-name="L1">
      <style:graphic-properties svg:stroke-color="#ff8000" draw:fill="none" loext:fill-use-slide-background="false" draw:textarea-horizontal-align="justify" draw:textarea-vertical-align="top" draw:auto-grow-height="false" fo:min-height="42.456cm" fo:min-width="12.679cm" style:writing-mode="lr-tb" loext:decorative="false"/>
      <style:paragraph-properties style:writing-mode="lr-tb"/>
    </style:style>
    <style:style style:name="gr75" style:family="graphic" style:parent-style-name="standard" style:list-style-name="L1">
      <style:graphic-properties svg:stroke-color="#ff8000" draw:fill="none" loext:fill-use-slide-background="false" draw:textarea-horizontal-align="justify" draw:textarea-vertical-align="bottom" draw:auto-grow-height="false" fo:min-height="5.334cm" fo:min-width="2.505cm" style:writing-mode="lr-tb" loext:decorative="false"/>
      <style:paragraph-properties style:writing-mode="lr-tb"/>
    </style:style>
    <style:style style:name="gr76" style:family="graphic" style:parent-style-name="standard" style:list-style-name="L1">
      <style:graphic-properties svg:stroke-color="#ff8000" draw:fill="none" loext:fill-use-slide-background="false" draw:textarea-horizontal-align="center" draw:textarea-vertical-align="bottom" draw:auto-grow-height="false" fo:min-height="3.367cm" fo:min-width="42.998cm" style:writing-mode="lr-tb" loext:decorative="false"/>
      <style:paragraph-properties style:writing-mode="lr-tb"/>
    </style:style>
    <style:style style:name="gr77" style:family="graphic" style:parent-style-name="standard">
      <style:graphic-properties svg:stroke-color="#ff8000" draw:fill="none" loext:fill-use-slide-background="false" draw:textarea-horizontal-align="right" draw:textarea-vertical-align="middle" draw:auto-grow-height="false" fo:min-height="2.34cm" fo:min-width="8.492cm" style:writing-mode="lr-tb" loext:decorative="false"/>
      <style:paragraph-properties style:writing-mode="lr-tb"/>
    </style:style>
    <style:style style:name="gr78" style:family="graphic" style:parent-style-name="standard">
      <style:graphic-properties draw:fill="solid" draw:fill-color="#ec9ba4" draw:textarea-horizontal-align="justify" draw:textarea-vertical-align="middle" draw:auto-grow-height="false" fo:min-height="2.042cm" fo:min-width="2.433cm" style:writing-mode="lr-tb" loext:decorative="false"/>
      <style:paragraph-properties style:writing-mode="lr-tb"/>
    </style:style>
    <style:style style:name="gr79" style:family="graphic" style:parent-style-name="standard">
      <style:graphic-properties svg:stroke-color="#729fcf" draw:fill="solid" draw:fill-color="#ffb66c" draw:textarea-horizontal-align="justify" draw:textarea-vertical-align="middle" draw:auto-grow-height="false" fo:min-height="2.042cm" fo:min-width="2.375cm" style:writing-mode="lr-tb" loext:decorative="false"/>
      <style:paragraph-properties style:writing-mode="lr-tb"/>
    </style:style>
    <style:style style:name="P1" style:family="paragraph">
      <loext:graphic-properties draw:fill="none"/>
      <style:paragraph-properties fo:text-align="center"/>
      <style:text-properties style:font-name="Gabriela Nerd Font1"/>
    </style:style>
    <style:style style:name="P2" style:family="paragraph">
      <style:paragraph-properties fo:text-align="center"/>
      <style:text-properties style:font-name="Gabriela Nerd Font1" fo:font-size="12pt"/>
    </style:style>
    <style:style style:name="P3" style:family="paragraph">
      <style:paragraph-properties fo:text-align="center" style:writing-mode="lr-tb"/>
      <style:text-properties style:font-name="Gabriela Nerd Font1" fo:font-size="12pt"/>
    </style:style>
    <style:style style:name="P4" style:family="paragraph">
      <style:paragraph-properties fo:margin-left="0cm" fo:margin-right="0cm" fo:margin-top="0cm" fo:margin-bottom="0cm" fo:line-height="100%" fo:text-align="center" fo:text-indent="0cm"/>
      <style:text-properties style:font-name="Gabriela Nerd Font1" fo:font-size="12pt"/>
    </style:style>
    <style:style style:name="P5" style:family="paragraph">
      <style:paragraph-properties fo:margin-left="0cm" fo:margin-right="0cm" fo:text-align="center" fo:text-indent="0cm"/>
      <style:text-properties style:font-name="Gabriela Nerd Font1" fo:font-size="12pt"/>
    </style:style>
    <style:style style:name="P6" style:family="paragraph">
      <style:paragraph-properties fo:margin-left="0cm" fo:margin-right="0cm" fo:text-align="center" fo:text-indent="0cm" style:writing-mode="lr-tb"/>
      <style:text-properties style:font-name="Gabriela Nerd Font1" fo:font-size="12pt"/>
    </style:style>
    <style:style style:name="P7" style:family="paragraph">
      <loext:graphic-properties draw:fill="solid" draw:fill-color="#ffb66c"/>
      <style:paragraph-properties fo:text-align="center" style:writing-mode="lr-tb"/>
      <style:text-properties style:font-name="Gabriela Nerd Font1" fo:font-size="12pt"/>
    </style:style>
    <style:style style:name="P8" style:family="paragraph">
      <style:paragraph-properties fo:margin-left="0cm" fo:margin-right="0cm" fo:text-align="center" fo:text-indent="0cm"/>
      <style:text-properties fo:color="#000000" loext:opacity="100%" style:font-name="Gabriela Nerd Font1" fo:font-size="12pt" style:letter-kerning="true" style:font-name-asian="Microsoft YaHei" style:font-size-asian="18pt" style:font-name-complex="Arial" style:font-size-complex="18pt"/>
    </style:style>
    <style:style style:name="P9" style:family="paragraph">
      <style:paragraph-properties fo:margin-left="0cm" fo:margin-right="0cm" fo:margin-top="0cm" fo:margin-bottom="0cm" fo:line-height="100%" fo:text-align="center" fo:text-indent="0cm"/>
      <style:text-properties fo:color="#000000" loext:opacity="100%" style:font-name="Gabriela Nerd Font1" fo:font-size="12pt" style:letter-kerning="true" style:font-name-asian="Microsoft YaHei" style:font-size-asian="18pt" style:font-name-complex="Arial" style:font-size-complex="18pt"/>
    </style:style>
    <style:style style:name="P10" style:family="paragraph">
      <loext:graphic-properties draw:fill-color="#ffb66c"/>
      <style:paragraph-properties fo:margin-left="0cm" fo:margin-right="0cm" fo:text-align="center" fo:text-indent="0cm" style:writing-mode="lr-tb"/>
      <style:text-properties fo:color="#000000" loext:opacity="100%" style:font-name="Gabriela Nerd Font1" fo:font-size="12pt" style:letter-kerning="true" style:font-name-asian="Microsoft YaHei" style:font-size-asian="18pt" style:font-name-complex="Arial" style:font-size-complex="18pt"/>
    </style:style>
    <style:style style:name="P11" style:family="paragraph">
      <style:paragraph-properties fo:margin-left="0cm" fo:margin-right="0cm" fo:margin-top="0cm" fo:margin-bottom="0cm" fo:line-height="100%" fo:text-align="center" fo:text-indent="0cm" style:writing-mode="lr-tb"/>
      <style:text-properties style:font-name="Gabriela Nerd Font1" fo:font-size="12pt"/>
    </style:style>
    <style:style style:name="P12" style:family="paragraph">
      <loext:graphic-properties draw:fill="solid" draw:fill-color="#ec9ba4"/>
      <style:paragraph-properties fo:text-align="center" style:writing-mode="lr-tb"/>
      <style:text-properties style:font-name="Gabriela Nerd Font1" fo:font-size="12pt"/>
    </style:style>
    <style:style style:name="P13" style:family="paragraph">
      <loext:graphic-properties draw:fill="solid" draw:fill-color="#5983b0"/>
      <style:paragraph-properties fo:text-align="center" style:writing-mode="lr-tb"/>
      <style:text-properties style:font-name="Gabriela Nerd Font1" fo:font-size="12pt"/>
    </style:style>
    <style:style style:name="P14" style:family="paragraph">
      <loext:graphic-properties draw:fill="solid" draw:fill-color="#999999"/>
      <style:paragraph-properties fo:margin-left="0cm" fo:margin-right="0cm" fo:text-align="center" fo:text-indent="0cm" style:writing-mode="lr-tb"/>
      <style:text-properties fo:color="#000000" loext:opacity="100%" style:font-name="Gabriela Nerd Font1" fo:font-size="12pt" style:letter-kerning="true" style:font-name-asian="Microsoft YaHei" style:font-size-asian="18pt" style:font-name-complex="Arial" style:font-size-complex="18pt"/>
    </style:style>
    <style:style style:name="P15" style:family="paragraph">
      <loext:graphic-properties draw:fill="solid" draw:fill-color="#999999"/>
      <style:paragraph-properties fo:text-align="center" style:writing-mode="lr-tb"/>
      <style:text-properties style:font-name="Gabriela Nerd Font1" fo:font-size="12pt"/>
    </style:style>
    <style:style style:name="P16" style:family="paragraph">
      <loext:graphic-properties draw:fill="solid" draw:fill-color="#729fcf"/>
      <style:paragraph-properties fo:text-align="center" style:writing-mode="lr-tb"/>
      <style:text-properties style:font-name="Gabriela Nerd Font1" fo:font-size="12pt"/>
    </style:style>
    <style:style style:name="P17" style:family="paragraph">
      <style:paragraph-properties fo:text-align="center"/>
      <style:text-properties fo:color="#ff8000" loext:opacity="100%" style:font-name="Gabriela Nerd Font1" fo:font-size="96pt" style:font-size-asian="96pt" style:font-size-complex="96pt"/>
    </style:style>
    <style:style style:name="P18" style:family="paragraph">
      <loext:graphic-properties draw:fill="none"/>
      <style:paragraph-properties fo:text-align="center" style:writing-mode="lr-tb"/>
      <style:text-properties fo:color="#ff8000" loext:opacity="100%" style:font-name="Gabriela Nerd Font1" fo:font-size="96pt" style:font-size-asian="96pt" style:font-size-complex="96pt"/>
    </style:style>
    <style:style style:name="P19" style:family="paragraph">
      <style:paragraph-properties fo:text-align="center"/>
      <style:text-properties fo:color="#ff8000" loext:opacity="100%" fo:font-size="10pt" style:font-size-asian="10pt" style:font-size-complex="10pt"/>
    </style:style>
    <style:style style:name="P20" style:family="paragraph">
      <loext:graphic-properties draw:fill="none"/>
      <style:paragraph-properties fo:text-align="center" style:writing-mode="lr-tb"/>
      <style:text-properties fo:color="#ff8000" loext:opacity="100%" fo:font-size="10pt" style:font-size-asian="10pt" style:font-size-complex="10pt"/>
    </style:style>
    <style:style style:name="P21" style:family="paragraph">
      <style:paragraph-properties fo:text-align="right"/>
      <style:text-properties fo:color="#ff8000" loext:opacity="100%" fo:font-size="10pt" style:font-size-asian="10pt" style:font-size-complex="10pt"/>
    </style:style>
    <style:style style:name="P22" style:family="paragraph">
      <loext:graphic-properties draw:fill="none"/>
      <style:paragraph-properties fo:text-align="right" style:writing-mode="lr-tb"/>
      <style:text-properties fo:color="#ff8000" loext:opacity="100%" fo:font-size="10pt" style:font-size-asian="10pt" style:font-size-complex="10pt"/>
    </style:style>
    <style:style style:name="P23" style:family="paragraph">
      <loext:graphic-properties draw:fill="solid" draw:fill-color="#afd095"/>
      <style:paragraph-properties fo:text-align="center" style:writing-mode="lr-tb"/>
      <style:text-properties style:font-name="Gabriela Nerd Font1" fo:font-size="12pt"/>
    </style:style>
    <style:style style:name="P24" style:family="paragraph">
      <loext:graphic-properties draw:fill="none"/>
      <style:paragraph-properties fo:text-align="center"/>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style:paragraph-properties fo:margin-left="0cm" fo:margin-right="0cm" fo:margin-top="0cm" fo:margin-bottom="0cm" fo:line-height="100%" fo:text-align="center" fo:text-indent="0cm" style:writing-mode="lr-tb"/>
    </style:style>
    <style:style style:name="P27" style:family="paragraph">
      <style:paragraph-properties fo:margin-left="0cm" fo:margin-right="0cm" fo:margin-top="0cm" fo:margin-bottom="0cm" fo:line-height="100%" fo:text-align="center" fo:text-indent="0cm"/>
      <style:text-properties fo:color="#ff8000" loext:opacity="100%" fo:font-size="10pt" style:font-size-asian="10pt" style:font-size-complex="10pt"/>
    </style:style>
    <style:style style:name="P28" style:family="paragraph">
      <loext:graphic-properties draw:fill="none"/>
      <style:paragraph-properties fo:margin-left="0cm" fo:margin-right="0cm" fo:margin-top="0cm" fo:margin-bottom="0cm" fo:line-height="100%" fo:text-align="center" fo:text-indent="0cm" style:writing-mode="lr-tb"/>
      <style:text-properties fo:color="#ff8000" loext:opacity="100%" fo:font-size="10pt" style:font-size-asian="10pt" style:font-size-complex="10pt"/>
    </style:style>
    <style:style style:name="T1" style:family="text">
      <style:text-properties style:font-name="Gabriela Nerd Font1" fo:font-size="12pt" fo:font-weight="bold" style:font-weight-asian="bold" style:font-weight-complex="bold"/>
    </style:style>
    <style:style style:name="T2" style:family="text">
      <style:text-properties style:font-name="Gabriela Nerd Font1" fo:font-size="10pt" style:font-size-asian="10pt" style:font-size-complex="10pt"/>
    </style:style>
    <style:style style:name="T3" style:family="text">
      <style:text-properties style:font-name="Gabriela Nerd Font1" fo:font-size="12pt" fo:font-weight="bold" style:font-size-asian="10pt" style:font-weight-asian="bold" style:font-size-complex="10pt" style:font-weight-complex="bold"/>
    </style:style>
    <style:style style:name="T4" style:family="text">
      <style:text-properties style:font-name="Gabriela Nerd Font1" fo:font-size="10pt" fo:font-weight="normal" style:font-size-asian="10pt" style:font-weight-asian="normal" style:font-size-complex="10pt" style:font-weight-complex="normal"/>
    </style:style>
    <style:style style:name="T5" style:family="text">
      <style:text-properties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T6" style:family="text">
      <style:text-properties style:font-name="Gabriela Nerd Font1" fo:font-size="10pt" style:letter-kerning="true" style:font-name-asian="Microsoft YaHei" style:font-size-asian="10pt" style:font-name-complex="Arial" style:font-size-complex="10pt"/>
    </style:style>
    <style:style style:name="T7" style:family="text">
      <style:text-properties style:font-name="Gabriela Nerd Font1" fo:font-size="12pt" fo:font-weight="bold" style:font-size-asian="12pt" style:font-weight-asian="bold" style:font-size-complex="12pt" style:font-weight-complex="bold"/>
    </style:style>
    <style:style style:name="T8" style:family="text">
      <style:text-properties style:font-name="Gabriela Nerd Font1" fo:font-size="12pt"/>
    </style:style>
    <style:style style:name="T9" style:family="text">
      <style:text-properties fo:color="#000000" loext:opacity="100%"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T10" style:family="text">
      <style:text-properties fo:color="#000000" loext:opacity="100%" style:font-name="Gabriela Nerd Font1" fo:font-size="10pt" style:letter-kerning="true" style:font-name-asian="Microsoft YaHei" style:font-size-asian="10pt" style:font-name-complex="Arial" style:font-size-complex="10pt"/>
    </style:style>
    <style:style style:name="T11" style:family="text">
      <style:text-properties fo:color="#000000" loext:opacity="100%" style:font-name="Gabriela Nerd Font1" fo:font-size="12pt" style:letter-kerning="true" style:font-name-asian="Microsoft YaHei" style:font-size-asian="18pt" style:font-name-complex="Arial" style:font-size-complex="18pt"/>
    </style:style>
    <style:style style:name="T12" style:family="text">
      <style:text-properties fo:color="#000000" loext:opacity="100%" style:font-name="Gabriela Nerd Font1" fo:font-size="10pt" fo:font-weight="normal" style:letter-kerning="true" style:font-name-asian="Microsoft YaHei" style:font-size-asian="10pt" style:font-weight-asian="normal" style:font-name-complex="Arial" style:font-size-complex="10pt" style:font-weight-complex="normal"/>
    </style:style>
    <style:style style:name="T13" style:family="text">
      <style:text-properties fo:color="#000000" loext:opacity="100%" style:font-name="Gabriela Nerd Font1" fo:font-size="12pt" fo:font-weight="bold" style:letter-kerning="true" style:font-name-asian="Microsoft YaHei" style:font-size-asian="12pt" style:font-weight-asian="bold" style:font-name-complex="Arial" style:font-size-complex="12pt" style:font-weight-complex="bold"/>
    </style:style>
    <style:style style:name="T14" style:family="text">
      <style:text-properties style:font-name="Gabriela Nerd Font1" fo:font-size="12pt" style:text-underline-style="solid" style:text-underline-width="auto" style:text-underline-color="font-color" fo:font-weight="bold" style:font-weight-asian="bold" style:font-weight-complex="bold"/>
    </style:style>
    <style:style style:name="T15" style:family="text">
      <style:text-properties style:font-name="Gabriela Nerd Font1" fo:font-size="10pt" fo:font-weight="bold" style:font-size-asian="10pt" style:font-weight-asian="bold" style:font-size-complex="10pt" style:font-weight-complex="bold"/>
    </style:style>
    <style:style style:name="T16" style:family="text">
      <style:text-properties fo:color="#ff8000" loext:opacity="100%" style:font-name="Gabriela Nerd Font1" fo:font-size="80pt" style:font-size-asian="80pt" style:font-size-complex="80pt"/>
    </style:style>
    <style:style style:name="T17" style:family="text">
      <style:text-properties fo:color="#ff8000" loext:opacity="100%" style:font-name="Gabriela Nerd Font1" fo:font-size="96pt" style:font-size-asian="96pt" style:font-size-complex="96pt"/>
    </style:style>
    <style:style style:name="T18" style:family="text">
      <style:text-properties fo:color="#ff8000" loext:opacity="100%" fo:font-size="10pt" style:font-size-asian="10pt" style:font-size-complex="10pt"/>
    </style:style>
    <style:style style:name="T19" style:family="text">
      <style:text-properties fo:font-variant="normal" fo:text-transform="none" fo:color="#ff8000" loext:opacity="100%" style:text-outline="false" style:text-line-through-style="none" style:text-line-through-type="none" style:font-name="Gabriela Nerd Font"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20" style:family="text">
      <style:text-properties fo:color="#ff8000" loext:opacity="100%" style:font-name="Gabriela Nerd Font1"/>
    </style:style>
    <style:style style:name="T21" style:family="text">
      <style:text-properties fo:color="#ff8000" loext:opacity="100%" style:font-name="Gabriela Nerd Font1" fo:font-size="10pt" fo:font-weight="normal" style:font-size-asian="10pt" style:font-weight-asian="normal" style:font-size-complex="10pt" style:font-weight-complex="normal"/>
    </style:style>
    <style:style style:name="T22" style:family="text">
      <style:text-properties fo:color="#ff8000" loext:opacity="100%" style:font-name="Gabriela Nerd Font1" fo:font-size="10pt" style:font-size-asian="10pt" style:font-size-complex="10pt"/>
    </style:style>
    <style:style style:name="T23" style:family="text">
      <style:text-properties fo:color="#ff8000" loext:opacity="100%" style:text-position="super 58%" fo:font-size="10pt" style:font-size-asian="10pt" style:font-size-complex="10pt"/>
    </style:style>
    <style:style style:name="T24" style:family="text">
      <style:text-properties fo:color="#ffb66c" loext:opacity="100%" fo:font-size="10pt" style:font-size-asian="10pt" style:font-size-complex="10pt"/>
    </style:style>
    <style:style style:name="T25" style:family="text">
      <style:text-properties fo:color="#ff8000" loext:opacity="100%" style:text-position="0% 100%" fo:font-size="10pt" style:font-size-asian="10pt" style:font-size-complex="10pt"/>
    </style:style>
    <style:style style:name="T26" style:family="text">
      <style:text-properties style:font-name="Gabriela Nerd Font1" fo:font-size="12pt"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onnector draw:style-name="gr1" draw:text-style-name="P1" draw:layer="layout" draw:type="curve" svg:x1="83.085cm" svg:y1="107.166cm" svg:x2="79.071cm" svg:y2="111.113cm" draw:start-shape="id1" draw:start-glue-point="0" draw:end-shape="id2" draw:end-glue-point="0" svg:d="M83085 107166c0 2998-4014 1025-4014 3947" svg:viewBox="0 0 4015 3948">
          <text:p/>
        </draw:connector>
        <draw:connector draw:style-name="gr1" draw:text-style-name="P1" draw:layer="layout" draw:type="curve" svg:x1="83.085cm" svg:y1="107.166cm" svg:x2="82.424cm" svg:y2="111.114cm" draw:start-shape="id1" draw:start-glue-point="0" draw:end-shape="id3" draw:end-glue-point="0" svg:d="M83085 107166c0 3000-661 1026-661 3948" svg:viewBox="0 0 662 3949">
          <text:p/>
        </draw:connector>
        <draw:connector draw:style-name="gr1" draw:text-style-name="P1" draw:layer="layout" draw:type="curve" svg:x1="83.085cm" svg:y1="107.166cm" svg:x2="65.581cm" svg:y2="111.111cm" draw:start-shape="id1" draw:start-glue-point="0" draw:end-shape="id4" draw:end-glue-point="0" svg:d="M83085 107166c0 2997-17504 1025-17504 3945" svg:viewBox="0 0 17505 3946">
          <text:p/>
        </draw:connector>
        <draw:connector draw:style-name="gr1" draw:text-style-name="P1" draw:layer="layout" draw:type="curve" svg:x1="83.085cm" svg:y1="107.166cm" svg:x2="68.98cm" svg:y2="111.111cm" draw:start-shape="id1" draw:start-glue-point="0" draw:end-shape="id5" draw:end-glue-point="0" svg:d="M83085 107166c0 2997-14105 1025-14105 3945" svg:viewBox="0 0 14106 3946">
          <text:p/>
        </draw:connector>
        <draw:connector draw:style-name="gr1" draw:text-style-name="P1" draw:layer="layout" draw:type="curve" svg:x1="83.085cm" svg:y1="107.166cm" svg:x2="72.389cm" svg:y2="111.111cm" draw:start-shape="id1" draw:start-glue-point="0" draw:end-shape="id6" draw:end-glue-point="0" svg:d="M83085 107166c0 2997-10696 1025-10696 3945" svg:viewBox="0 0 10697 3946">
          <text:p/>
        </draw:connector>
        <draw:connector draw:style-name="gr1" draw:text-style-name="P1" draw:layer="layout" draw:type="curve" svg:x1="83.085cm" svg:y1="107.166cm" svg:x2="75.722cm" svg:y2="111.112cm" draw:start-shape="id1" draw:start-glue-point="0" draw:end-shape="id7" draw:end-glue-point="0" svg:d="M83085 107166c0 2998-7363 1026-7363 3946" svg:viewBox="0 0 7364 3947">
          <text:p/>
        </draw:connector>
        <draw:connector draw:style-name="gr1" draw:text-style-name="P1" draw:layer="layout" draw:type="curve" svg:x1="12.167cm" svg:y1="50.06cm" svg:x2="20.501cm" svg:y2="53.936cm" draw:start-shape="id8" draw:start-glue-point="2" draw:end-shape="id9" draw:end-glue-point="0" svg:d="M12167 50060c0 2908 8334 971 8334 3876" svg:viewBox="0 0 8335 3877">
          <text:p/>
        </draw:connector>
        <draw:connector draw:style-name="gr2" draw:text-style-name="P1" draw:layer="layout" draw:type="curve" svg:x1="83.242cm" svg:y1="124.625cm" svg:x2="83.256cm" svg:y2="128.141cm" draw:start-shape="id10" draw:start-glue-point="2" draw:end-shape="id11" draw:end-glue-point="0" svg:d="M83242 124625c0 2638 14 881 14 3516" svg:viewBox="0 0 15 3517">
          <text:p/>
        </draw:connector>
        <draw:connector draw:style-name="gr1" draw:text-style-name="P1" draw:layer="layout" draw:type="curve" svg:x1="67.587cm" svg:y1="50.061cm" svg:x2="46.849cm" svg:y2="61.615cm" draw:start-shape="id12" draw:start-glue-point="2" draw:end-shape="id13" draw:end-glue-point="0" svg:d="M67587 50061c0 8667-20738 2890-20738 11554" svg:viewBox="0 0 20739 11555">
          <text:p/>
        </draw:connector>
        <draw:connector draw:style-name="gr1" draw:text-style-name="P1" draw:layer="layout" draw:type="curve" svg:x1="67.587cm" svg:y1="50.061cm" svg:x2="50.251cm" svg:y2="61.615cm" draw:start-shape="id12" draw:start-glue-point="2" draw:end-shape="id14" draw:end-glue-point="0" svg:d="M67587 50061c0 8667-17336 2890-17336 11554" svg:viewBox="0 0 17337 11555">
          <text:p/>
        </draw:connector>
        <draw:connector draw:style-name="gr3" draw:text-style-name="P1" draw:layer="layout" draw:type="curve" svg:x1="67.587cm" svg:y1="50.061cm" svg:x2="53.617cm" svg:y2="61.615cm" draw:start-shape="id12" draw:start-glue-point="2" draw:end-shape="id15" draw:end-glue-point="0" svg:d="M67587 50061c0 8665-13970 2889-13970 11554" svg:viewBox="0 0 13971 11555">
          <text:p/>
        </draw:connector>
        <draw:custom-shape draw:style-name="gr4" draw:text-style-name="P3" xml:id="id181" draw:id="id181" draw:layer="layout" svg:width="3.048cm" svg:height="2.54cm" svg:x="84.859cm" svg:y="3.35cm">
          <text:p text:style-name="P2"><text:span text:style-name="T1">Adam</text:span></text:p>
          <text:p text:style-name="P2"><text:span text:style-name="T2">1Ch 1:1</text:span></text:p>
          <text:p text:style-name="P2"><text:span text:style-name="T2">Gen 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9" draw:id="id179" draw:layer="layout" svg:width="3.048cm" svg:height="2.54cm" svg:x="84.862cm" svg:y="6.36cm">
          <text:p text:style-name="P2"><text:span text:style-name="T1">Sheth</text:span></text:p>
          <text:p text:style-name="P2"><text:span text:style-name="T2">1Ch 1:1</text:span></text:p>
          <text:p text:style-name="P4"><text:span text:style-name="T3">Seth</text:span></text:p>
          <text:p text:style-name="P4"><text:span text:style-name="T4">Gen 4: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6" xml:id="id180" draw:id="id180" draw:layer="layout" svg:width="3.048cm" svg:height="2.54cm" svg:x="84.861cm" svg:y="9.419cm">
          <text:p text:style-name="P5"><text:span text:style-name="T5">Enosh</text:span></text:p>
          <text:p text:style-name="P5"><text:span text:style-name="T6">1Ch 1:1</text:span></text:p>
          <text:p text:style-name="P4"><text:span text:style-name="T5">Enos</text:span></text:p>
          <text:p text:style-name="P4"><text:span text:style-name="T6">Gen 5: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6" xml:id="id182" draw:id="id182" draw:layer="layout" svg:width="3.048cm" svg:height="2.54cm" svg:x="84.863cm" svg:y="12.443cm">
          <text:p text:style-name="P5"><text:span text:style-name="T5">Kenan</text:span></text:p>
          <text:p text:style-name="P5"><text:span text:style-name="T6">1Ch 1:2</text:span></text:p>
          <text:p text:style-name="P4"><text:span text:style-name="T5">Cainan</text:span></text:p>
          <text:p text:style-name="P4"><text:span text:style-name="T6">Gen 5: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83" draw:id="id183" draw:layer="layout" svg:width="3.048cm" svg:height="2.54cm" svg:x="84.863cm" svg:y="15.473cm">
          <text:p text:style-name="P2"><text:span text:style-name="T1">Mahalaleel</text:span></text:p>
          <text:p text:style-name="P2"><text:span text:style-name="T2">1Ch 1:2</text:span></text:p>
          <text:p text:style-name="P2"><text:span text:style-name="T2">Gen 5:12</text:span></text:p>
          <text:p text:style-name="P4"><text:span text:style-name="T1">Maleleel</text:span></text:p>
          <text:p text:style-name="P4"><text:span text:style-name="T2">Luk 3:3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84" draw:id="id184" draw:layer="layout" svg:width="3.048cm" svg:height="2.54cm" svg:x="84.869cm" svg:y="18.43cm">
          <text:p text:style-name="P2"><text:span text:style-name="T1">Jered</text:span></text:p>
          <text:p text:style-name="P2"><text:span text:style-name="T2">1Ch 1:2</text:span></text:p>
          <text:p text:style-name="P4"><text:span text:style-name="T1">Jared</text:span></text:p>
          <text:p text:style-name="P4"><text:span text:style-name="T2">Gen 5: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85" draw:id="id185" draw:layer="layout" svg:width="3.048cm" svg:height="2.54cm" svg:x="84.869cm" svg:y="21.605cm">
          <text:p text:style-name="P2"><text:span text:style-name="T1">Henoch</text:span></text:p>
          <text:p text:style-name="P4"><text:span text:style-name="T2">1Ch 1:3</text:span></text:p>
          <text:p text:style-name="P2"><text:span text:style-name="T1">Enoch</text:span></text:p>
          <text:p text:style-name="P2"><text:span text:style-name="T2">Gen 5: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3" xml:id="id186" draw:id="id186" draw:layer="layout" svg:width="3.15cm" svg:height="2.54cm" svg:x="84.825cm" svg:y="24.753cm">
          <text:p text:style-name="P2"><text:span text:style-name="T1">Methuselah</text:span></text:p>
          <text:p text:style-name="P2"><text:span text:style-name="T2">1Ch 1:3</text:span></text:p>
          <text:p text:style-name="P2"><text:span text:style-name="T2">Gen 5:21</text:span></text:p>
          <text:p text:style-name="P2"><text:span text:style-name="T1">Mathusala</text:span></text:p>
          <text:p text:style-name="P2"><text:span text:style-name="T2">Luke 3:3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87" draw:id="id187" draw:layer="layout" svg:width="3.048cm" svg:height="2.54cm" svg:x="84.881cm" svg:y="27.855cm">
          <text:p text:style-name="P2"><text:span text:style-name="T1">Lamech</text:span></text:p>
          <text:p text:style-name="P2"><text:span text:style-name="T2">1Ch 1:3</text:span></text:p>
          <text:p text:style-name="P2"><text:span text:style-name="T2">Gen 5:26</text:span></text:p>
          <text:p text:style-name="P2"><text:span text:style-name="T2">Luk 3:3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 draw:id="id16" draw:layer="layout" svg:width="3.048cm" svg:height="2.54cm" svg:x="84.896cm" svg:y="30.93cm">
          <text:p text:style-name="P2"><text:span text:style-name="T1">Noah</text:span></text:p>
          <text:p text:style-name="P2"><text:span text:style-name="T2">1Ch 1:4</text:span></text:p>
          <text:p text:style-name="P2"><text:span text:style-name="T2">Gen 5:28,29</text:span></text:p>
          <text:p text:style-name="P4"><text:span text:style-name="T1">Noe</text:span></text:p>
          <text:p text:style-name="P4"><text:span text:style-name="T2">Luk 3:3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60" draw:id="id60" draw:layer="layout" svg:width="3.048cm" svg:height="2.54cm" svg:x="84.92cm" svg:y="41.536cm">
          <text:p text:style-name="P2"><text:span text:style-name="T1">Shem</text:span></text:p>
          <text:p text:style-name="P2"><text:span text:style-name="T2">1Ch 1:4</text:span></text:p>
          <text:p text:style-name="P2"><text:span text:style-name="T2">Gen 5:32</text:span></text:p>
          <text:p text:style-name="P4"><text:span text:style-name="T1">Sem</text:span></text:p>
          <text:p text:style-name="P4"><text:span text:style-name="T2">Luk 3:3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 draw:id="id17" draw:layer="layout" svg:width="3.048cm" svg:height="2.54cm" svg:x="54.953cm" svg:y="41.537cm">
          <text:p text:style-name="P2"><text:span text:style-name="T1">Ham</text:span></text:p>
          <text:p text:style-name="P2"><text:span text:style-name="T2">1Ch 1:4</text:span></text:p>
          <text:p text:style-name="P2"><text:span text:style-name="T2">Gen 5: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8" draw:id="id18" draw:layer="layout" svg:width="3.048cm" svg:height="2.54cm" svg:x="115.408cm" svg:y="41.705cm">
          <text:p text:style-name="P2"><text:span text:style-name="T1">Japheth</text:span></text:p>
          <text:p text:style-name="P2"><text:span text:style-name="T2">1Ch 1:4</text:span></text:p>
          <text:p text:style-name="P2"><text:span text:style-name="T2">Gen 5: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0" draw:id="id20" draw:layer="layout" svg:width="3.048cm" svg:height="2.54cm" svg:x="110.436cm" svg:y="45.37cm">
          <text:p text:style-name="P2"><text:span text:style-name="T1">Magog</text:span></text:p>
          <text:p text:style-name="P2"><text:span text:style-name="T2">1Ch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9" draw:id="id19" draw:layer="layout" svg:width="3.048cm" svg:height="2.54cm" svg:x="107.002cm" svg:y="45.371cm">
          <text:p text:style-name="P2"><text:span text:style-name="T1">Gomer</text:span></text:p>
          <text:p text:style-name="P2"><text:span text:style-name="T2">1Ch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3" xml:id="id21" draw:id="id21" draw:layer="layout" svg:width="3.048cm" svg:height="3.15cm" svg:x="113.915cm" svg:y="45.37cm">
          <text:p text:style-name="P2"><text:span text:style-name="T1">Madai</text:span></text:p>
          <text:p text:style-name="P4"><text:span text:style-name="T4">1Ch 1:5</text:span></text:p>
          <text:p text:style-name="P2"><text:span text:style-name="T1">Medes</text:span></text:p>
          <text:p text:style-name="P2"><text:span text:style-name="T2">2Ki 17:6</text:span></text:p>
          <text:p text:style-name="P2"><text:span text:style-name="T1">Media</text:span></text:p>
          <text:p text:style-name="P2"><text:span text:style-name="T2">Est 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3" draw:id="id23" draw:layer="layout" svg:width="3.048cm" svg:height="2.54cm" svg:x="120.891cm" svg:y="45.37cm">
          <text:p text:style-name="P2"><text:span text:style-name="T1">Tubal</text:span></text:p>
          <text:p text:style-name="P2"><text:span text:style-name="T2">1Ch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3" xml:id="id22" draw:id="id22" draw:layer="layout" svg:width="3.048cm" svg:height="3.15cm" svg:x="117.407cm" svg:y="45.37cm">
          <text:p text:style-name="P2"><text:span text:style-name="T1">Javan</text:span></text:p>
          <text:p text:style-name="P2"><text:span text:style-name="T2">1Ch 1:5</text:span></text:p>
          <text:p text:style-name="P2"><text:span text:style-name="T1">Grecia</text:span></text:p>
          <text:p text:style-name="P2"><text:span text:style-name="T2">Dan 8:21</text:span></text:p>
          <text:p text:style-name="P2"><text:span text:style-name="T1">Greece</text:span></text:p>
          <text:p text:style-name="P2"><text:span text:style-name="T2">Zec 9: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4" draw:id="id24" draw:layer="layout" svg:width="3.048cm" svg:height="2.54cm" svg:x="124.47cm" svg:y="45.37cm">
          <text:p text:style-name="P2"><text:span text:style-name="T1">Meshech</text:span></text:p>
          <text:p text:style-name="P2"><text:span text:style-name="T2">1Ch 1:5</text:span></text:p>
          <text:p text:style-name="P2"><text:span text:style-name="T7">Mesech</text:span></text:p>
          <text:p text:style-name="P2"><text:span text:style-name="T2">Psa 120: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5" draw:id="id25" draw:layer="layout" svg:width="3.048cm" svg:height="2.54cm" svg:x="128.112cm" svg:y="45.371cm">
          <text:p text:style-name="P2"><text:span text:style-name="T1">Tiras</text:span></text:p>
          <text:p text:style-name="P2"><text:span text:style-name="T2">1Ch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7" draw:id="id27" draw:layer="layout" svg:width="3.048cm" svg:height="2.54cm" svg:x="110.354cm" svg:y="50.771cm">
          <text:p text:style-name="P2"><text:span text:style-name="T1">Riphath</text:span></text:p>
          <text:p text:style-name="P2"><text:span text:style-name="T2">1Ch 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6" draw:id="id26" draw:layer="layout" svg:width="3.048cm" svg:height="2.54cm" svg:x="107.013cm" svg:y="50.772cm">
          <text:p text:style-name="P2"><text:span text:style-name="T1">Ashchenaz</text:span></text:p>
          <text:p text:style-name="P2"><text:span text:style-name="T2">1Ch 1:6</text:span></text:p>
          <text:p text:style-name="P2"><text:span text:style-name="T1">Ashkenaz</text:span></text:p>
          <text:p text:style-name="P2"><text:span text:style-name="T2">Gen 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3" xml:id="id28" draw:id="id28" draw:layer="layout" svg:width="3.15cm" svg:height="2.54cm" svg:x="113.695cm" svg:y="50.771cm">
          <text:p text:style-name="P2"><text:span text:style-name="T1">Togarmah</text:span></text:p>
          <text:p text:style-name="P2"><text:span text:style-name="T2">1Ch 1:6</text:span></text:p>
          <text:p text:style-name="P2"><text:span text:style-name="T2">Eze 27:14, 38: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6.42cm" svg:y1="33.47cm" svg:x2="56.477cm" svg:y2="41.537cm" draw:start-shape="id16" draw:start-glue-point="2" draw:end-shape="id17" draw:end-glue-point="0" svg:d="M86420 33470c0 6051-29943 2018-29943 8067" svg:viewBox="0 0 29944 8068">
          <text:p/>
        </draw:connector>
        <draw:connector draw:style-name="gr1" draw:text-style-name="P1" draw:layer="layout" draw:type="curve" svg:x1="86.42cm" svg:y1="33.47cm" svg:x2="116.932cm" svg:y2="41.705cm" draw:start-shape="id16" draw:start-glue-point="2" draw:end-shape="id18" draw:end-glue-point="0" svg:d="M86420 33470c0 6177 30512 2060 30512 8235" svg:viewBox="0 0 30513 8236">
          <text:p/>
        </draw:connector>
        <draw:connector draw:style-name="gr7" draw:text-style-name="P1" draw:layer="layout" draw:type="curve" svg:x1="116.932cm" svg:y1="44.245cm" svg:x2="108.526cm" svg:y2="45.371cm" draw:start-shape="id18" draw:start-glue-point="2" draw:end-shape="id19" draw:end-glue-point="0" svg:d="M116932 44245c0 846-8406 283-8406 1126" svg:viewBox="0 0 8407 1127">
          <text:p/>
        </draw:connector>
        <draw:connector draw:style-name="gr7" draw:text-style-name="P1" draw:layer="layout" draw:type="curve" svg:x1="116.932cm" svg:y1="44.245cm" svg:x2="111.96cm" svg:y2="45.37cm" draw:start-shape="id18" draw:start-glue-point="2" draw:end-shape="id20" draw:end-glue-point="0" svg:d="M116932 44245c0 844-4972 282-4972 1125" svg:viewBox="0 0 4973 1126">
          <text:p/>
        </draw:connector>
        <draw:connector draw:style-name="gr7" draw:text-style-name="P1" draw:layer="layout" draw:type="curve" svg:x1="116.932cm" svg:y1="44.245cm" svg:x2="115.439cm" svg:y2="45.37cm" draw:start-shape="id18" draw:start-glue-point="2" draw:end-shape="id21" draw:end-glue-point="0" svg:d="M116932 44245c0 844-1493 282-1493 1125" svg:viewBox="0 0 1494 1126">
          <text:p/>
        </draw:connector>
        <draw:connector draw:style-name="gr7" draw:text-style-name="P1" draw:layer="layout" draw:type="curve" svg:x1="116.932cm" svg:y1="44.245cm" svg:x2="118.931cm" svg:y2="45.37cm" draw:start-shape="id18" draw:start-glue-point="2" draw:end-shape="id22" draw:end-glue-point="0" svg:d="M116932 44245c0 844 1999 282 1999 1125" svg:viewBox="0 0 2000 1126">
          <text:p/>
        </draw:connector>
        <draw:connector draw:style-name="gr7" draw:text-style-name="P1" draw:layer="layout" draw:type="curve" svg:x1="116.932cm" svg:y1="44.245cm" svg:x2="122.415cm" svg:y2="45.37cm" draw:start-shape="id18" draw:start-glue-point="2" draw:end-shape="id23" draw:end-glue-point="0" svg:d="M116932 44245c0 844 5483 282 5483 1125" svg:viewBox="0 0 5484 1126">
          <text:p/>
        </draw:connector>
        <draw:connector draw:style-name="gr7" draw:text-style-name="P1" draw:layer="layout" draw:type="curve" svg:x1="116.932cm" svg:y1="44.245cm" svg:x2="125.994cm" svg:y2="45.37cm" draw:start-shape="id18" draw:start-glue-point="2" draw:end-shape="id24" draw:end-glue-point="0" svg:d="M116932 44245c0 844 9062 282 9062 1125" svg:viewBox="0 0 9063 1126">
          <text:p/>
        </draw:connector>
        <draw:connector draw:style-name="gr7" draw:text-style-name="P1" draw:layer="layout" draw:type="curve" svg:x1="116.932cm" svg:y1="44.245cm" svg:x2="129.636cm" svg:y2="45.371cm" draw:start-shape="id18" draw:start-glue-point="2" draw:end-shape="id25" draw:end-glue-point="0" svg:d="M116932 44245c0 846 12704 283 12704 1126" svg:viewBox="0 0 12705 1127">
          <text:p/>
        </draw:connector>
        <draw:connector draw:style-name="gr7" draw:text-style-name="P1" draw:layer="layout" draw:type="curve" svg:x1="108.526cm" svg:y1="47.911cm" svg:x2="108.537cm" svg:y2="50.772cm" draw:start-shape="id19" draw:start-glue-point="2" draw:end-shape="id26" draw:end-glue-point="0" svg:d="M108526 47911c0 2146 11 716 11 2861" svg:viewBox="0 0 12 2862">
          <text:p/>
        </draw:connector>
        <draw:connector draw:style-name="gr7" draw:text-style-name="P1" draw:layer="layout" draw:type="curve" svg:x1="108.526cm" svg:y1="47.911cm" svg:x2="111.878cm" svg:y2="50.771cm" draw:start-shape="id19" draw:start-glue-point="2" draw:end-shape="id27" draw:end-glue-point="0" svg:d="M108526 47911c0 2146 3352 717 3352 2860" svg:viewBox="0 0 3353 2861">
          <text:p/>
        </draw:connector>
        <draw:connector draw:style-name="gr7" draw:text-style-name="P1" draw:layer="layout" draw:type="curve" svg:x1="108.526cm" svg:y1="47.911cm" svg:x2="115.27cm" svg:y2="50.771cm" draw:start-shape="id19" draw:start-glue-point="2" draw:end-shape="id28" draw:end-glue-point="0" svg:d="M108526 47911c0 2146 6744 717 6744 2860" svg:viewBox="0 0 6745 2861">
          <text:p/>
        </draw:connector>
        <draw:connector draw:style-name="gr7" draw:text-style-name="P1" draw:layer="layout" draw:type="curve" svg:x1="118.931cm" svg:y1="48.52cm" svg:x2="118.922cm" svg:y2="50.737cm" draw:start-shape="id22" draw:start-glue-point="2" draw:end-shape="id29" draw:end-glue-point="0" svg:d="M118931 48520c0 1663-9 555-9 2217" svg:viewBox="0 0 10 2218">
          <text:p/>
        </draw:connector>
        <draw:connector draw:style-name="gr8" draw:text-style-name="P1" draw:layer="layout" draw:type="curve" svg:x1="118.931cm" svg:y1="48.52cm" svg:x2="126.027cm" svg:y2="50.771cm" draw:start-shape="id22" draw:start-glue-point="2" draw:end-shape="id30" draw:end-glue-point="0" svg:d="M118931 48520c0 1689 7096 564 7096 2251" svg:viewBox="0 0 7097 2252">
          <text:p/>
        </draw:connector>
        <draw:connector draw:style-name="gr7" draw:text-style-name="P1" draw:layer="layout" draw:type="curve" svg:x1="118.931cm" svg:y1="48.52cm" svg:x2="122.504cm" svg:y2="50.752cm" draw:start-shape="id22" draw:start-glue-point="2" draw:end-shape="id31" draw:end-glue-point="0" svg:d="M118931 48520c0 1675 3573 560 3573 2232" svg:viewBox="0 0 3574 2233">
          <text:p/>
        </draw:connector>
        <draw:connector draw:style-name="gr7" draw:text-style-name="P1" draw:layer="layout" draw:type="curve" svg:x1="56.477cm" svg:y1="44.077cm" svg:x2="12.167cm" svg:y2="47.52cm" draw:start-shape="id17" draw:start-glue-point="2" draw:end-shape="id8" draw:end-glue-point="0" svg:d="M56477 44077c0 2583-44310 862-44310 3443" svg:viewBox="0 0 44311 3444">
          <text:p/>
        </draw:connector>
        <draw:connector draw:style-name="gr7" draw:text-style-name="P1" draw:layer="layout" draw:type="curve" svg:x1="56.477cm" svg:y1="44.077cm" svg:x2="56.486cm" svg:y2="47.52cm" draw:start-shape="id17" draw:start-glue-point="2" draw:end-shape="id32" draw:end-glue-point="0" svg:d="M56477 44077c0 2583 9 862 9 3443" svg:viewBox="0 0 10 3444">
          <text:p/>
        </draw:connector>
        <draw:connector draw:style-name="gr7" draw:text-style-name="P1" draw:layer="layout" draw:type="curve" svg:x1="56.477cm" svg:y1="44.077cm" svg:x2="67.587cm" svg:y2="47.521cm" draw:start-shape="id17" draw:start-glue-point="2" draw:end-shape="id12" draw:end-glue-point="0" svg:d="M56477 44077c0 2584 11110 863 11110 3444" svg:viewBox="0 0 11111 3445">
          <text:p/>
        </draw:connector>
        <draw:connector draw:style-name="gr7" draw:text-style-name="P1" draw:layer="layout" draw:type="curve" svg:x1="12.167cm" svg:y1="50.06cm" svg:x2="3.73cm" svg:y2="53.933cm" draw:start-shape="id8" draw:start-glue-point="2" draw:end-shape="id33" draw:end-glue-point="0" svg:d="M12167 50060c0 2905-8437 969-8437 3873" svg:viewBox="0 0 8438 3874">
          <text:p/>
        </draw:connector>
        <draw:connector draw:style-name="gr7" draw:text-style-name="P1" draw:layer="layout" draw:type="curve" svg:x1="12.167cm" svg:y1="50.06cm" svg:x2="7.119cm" svg:y2="53.933cm" draw:start-shape="id8" draw:start-glue-point="2" draw:end-shape="id34" draw:end-glue-point="0" svg:d="M12167 50060c0 2905-5048 969-5048 3873" svg:viewBox="0 0 5049 3874">
          <text:p/>
        </draw:connector>
        <draw:connector draw:style-name="gr7" draw:text-style-name="P1" draw:layer="layout" draw:type="curve" svg:x1="12.167cm" svg:y1="50.06cm" svg:x2="10.398cm" svg:y2="53.933cm" draw:start-shape="id8" draw:start-glue-point="2" draw:end-shape="id35" draw:end-glue-point="0" svg:d="M12167 50060c0 2905-1769 969-1769 3873" svg:viewBox="0 0 1770 3874">
          <text:p/>
        </draw:connector>
        <draw:connector draw:style-name="gr8" draw:text-style-name="P1" draw:layer="layout" draw:type="curve" svg:x1="118.931cm" svg:y1="48.52cm" svg:x2="129.484cm" svg:y2="50.746cm" draw:start-shape="id22" draw:start-glue-point="2" draw:end-shape="id36" draw:end-glue-point="0" svg:d="M118931 48520c0 1671 10553 558 10553 2226" svg:viewBox="0 0 10554 2227">
          <text:p/>
        </draw:connector>
        <draw:connector draw:style-name="gr7" draw:text-style-name="P1" draw:layer="layout" draw:type="curve" svg:x1="56.477cm" svg:y1="44.077cm" svg:x2="35.755cm" svg:y2="47.52cm" draw:start-shape="id17" draw:start-glue-point="2" draw:end-shape="id37" draw:end-glue-point="0" svg:d="M56477 44077c0 2583-20722 862-20722 3443" svg:viewBox="0 0 20723 3444">
          <text:p/>
        </draw:connector>
        <draw:connector draw:style-name="gr7" draw:text-style-name="P1" draw:layer="layout" draw:type="curve" svg:x1="12.167cm" svg:y1="50.06cm" svg:x2="13.799cm" svg:y2="53.934cm" draw:start-shape="id8" draw:start-glue-point="2" draw:end-shape="id38" draw:end-glue-point="0" svg:d="M12167 50060c0 2907 1632 970 1632 3874" svg:viewBox="0 0 1633 3875">
          <text:p/>
        </draw:connector>
        <draw:connector draw:style-name="gr7" draw:text-style-name="P1" draw:layer="layout" draw:type="curve" svg:x1="12.167cm" svg:y1="50.06cm" svg:x2="17.2cm" svg:y2="53.935cm" draw:start-shape="id8" draw:start-glue-point="2" draw:end-shape="id39" draw:end-glue-point="0" svg:d="M12167 50060c0 2907 5033 970 5033 3875" svg:viewBox="0 0 5034 3876">
          <text:p/>
        </draw:connector>
        <draw:connector draw:style-name="gr3" draw:text-style-name="P1" draw:layer="layout" draw:type="curve" svg:x1="35.755cm" svg:y1="50.06cm" svg:x2="25.227cm" svg:y2="53.923cm" draw:start-shape="id37" draw:start-glue-point="2" draw:end-shape="id40" draw:end-glue-point="0" svg:d="M35755 50060c0 2898-10528 967-10528 3863" svg:viewBox="0 0 10529 3864">
          <text:p/>
        </draw:connector>
        <draw:custom-shape draw:style-name="gr4" draw:text-style-name="P3" xml:id="id31" draw:id="id31" draw:layer="layout" svg:width="3.048cm" svg:height="2.54cm" svg:x="120.98cm" svg:y="50.752cm">
          <text:p text:style-name="P2"><text:span text:style-name="T1">Tarshish</text:span></text:p>
          <text:p text:style-name="P2"><text:span text:style-name="T2">1Ch 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9" draw:id="id29" draw:layer="layout" svg:width="3.048cm" svg:height="2.54cm" svg:x="117.398cm" svg:y="50.737cm">
          <text:p text:style-name="P2"><text:span text:style-name="T1">Elishah</text:span></text:p>
          <text:p text:style-name="P2"><text:span text:style-name="T2">1Ch 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30" draw:id="id30" draw:layer="layout" svg:width="3.048cm" svg:height="2.54cm" svg:x="124.503cm" svg:y="50.771cm">
          <text:p text:style-name="P2"><text:span text:style-name="T1">Kittim</text:span></text:p>
          <text:p text:style-name="P2"><text:span text:style-name="T2">1Ch 1:7</text:span></text:p>
          <text:p text:style-name="P2"><text:span text:style-name="T1">Chittim</text:span></text:p>
          <text:p text:style-name="P2"><text:span text:style-name="T2">Num 24: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36" draw:id="id36" draw:layer="layout" svg:width="3.048cm" svg:height="2.54cm" svg:x="127.96cm" svg:y="50.746cm">
          <text:p text:style-name="P2"><text:span text:style-name="T1">Dodanim</text:span></text:p>
          <text:p text:style-name="P2"><text:span text:style-name="T2">1Ch 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3" xml:id="id37" draw:id="id37" draw:layer="layout" svg:width="3.048cm" svg:height="2.54cm" svg:x="34.231cm" svg:y="47.52cm">
          <text:p text:style-name="P2"><text:span text:style-name="T1">Mizraim</text:span></text:p>
          <text:p text:style-name="P2"><text:span text:style-name="T8">Egypt(ian)</text:span></text:p>
          <text:p text:style-name="P2"><text:span text:style-name="T2">1Ch 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 draw:text-style-name="P3" xml:id="id8" draw:id="id8" draw:layer="layout" svg:width="3.251cm" svg:height="2.54cm" svg:x="10.542cm" svg:y="47.52cm">
          <text:p text:style-name="P2"><text:span text:style-name="T1">Cush</text:span></text:p>
          <text:p text:style-name="P2"><text:span text:style-name="T8">Ethiopia(ns)</text:span></text:p>
          <text:p text:style-name="P2"><text:span text:style-name="T2">1Ch 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 draw:text-style-name="P3" xml:id="id32" draw:id="id32" draw:layer="layout" svg:width="3.15cm" svg:height="5.588cm" svg:x="54.911cm" svg:y="47.52cm">
          <text:p text:style-name="P2"><text:span text:style-name="T1">Put</text:span></text:p>
          <text:p text:style-name="P2"><text:span text:style-name="T2">1Ch 1:8</text:span></text:p>
          <text:p text:style-name="P2"><text:span text:style-name="T1">Phut</text:span></text:p>
          <text:p text:style-name="P2"><text:span text:style-name="T2">Gen 10:6</text:span></text:p>
          <text:p text:style-name="P2"><text:span text:style-name="T1">Libya(ns)</text:span></text:p>
          <text:p text:style-name="P2"><text:span text:style-name="T2">Jer 46:9</text:span></text:p>
          <text:p text:style-name="P2"><text:span text:style-name="T2">Eze 30:5, 38:5</text:span></text:p>
          <text:p text:style-name="P2"><text:span text:style-name="T2">Dan 11:43</text:span></text:p>
          <text:p text:style-name="P2"><text:span text:style-name="T7">Lubim(s)</text:span></text:p>
          <text:p text:style-name="P2"><text:span text:style-name="T4">Nah 3:9</text:span></text:p>
          <text:p text:style-name="P2"><text:span text:style-name="T4">2Ch 12:3, 16: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2" draw:id="id12" draw:layer="layout" svg:width="3.048cm" svg:height="2.54cm" svg:x="66.063cm" svg:y="47.521cm">
          <text:p text:style-name="P2"><text:span text:style-name="T1">Canaan</text:span></text:p>
          <text:p text:style-name="P2"><text:span text:style-name="T2">1Ch 1:8</text:span></text:p>
          <text:p text:style-name="P2"><text:span text:style-name="T1">Canaanites</text:span></text:p>
          <text:p text:style-name="P2"><text:span text:style-name="T2">Gen 10: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4" draw:id="id34" draw:layer="layout" svg:width="3.048cm" svg:height="2.54cm" svg:x="5.595cm" svg:y="53.933cm">
          <text:p text:style-name="P2"><text:span text:style-name="T1">Havilah</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3" draw:id="id33" draw:layer="layout" svg:width="3.048cm" svg:height="2.54cm" svg:x="2.206cm" svg:y="53.933cm">
          <text:p text:style-name="P2"><text:span text:style-name="T1">Seba</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5" draw:id="id35" draw:layer="layout" svg:width="3.048cm" svg:height="2.54cm" svg:x="8.874cm" svg:y="53.933cm">
          <text:p text:style-name="P2"><text:span text:style-name="T1">Sabta</text:span></text:p>
          <text:p text:style-name="P2"><text:span text:style-name="T2">1Ch 1:9</text:span></text:p>
          <text:p text:style-name="P2"><text:span text:style-name="T1">Sabtah</text:span></text:p>
          <text:p text:style-name="P2"><text:span text:style-name="T2">Gen 10: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8" draw:id="id38" draw:layer="layout" svg:width="3.048cm" svg:height="2.54cm" svg:x="12.275cm" svg:y="53.934cm">
          <text:p text:style-name="P2"><text:span text:style-name="T1">Raamah</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9" draw:id="id39" draw:layer="layout" svg:width="3.048cm" svg:height="2.54cm" svg:x="15.676cm" svg:y="53.935cm">
          <text:p text:style-name="P2"><text:span text:style-name="T1">Sabtecha</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 draw:id="id9" draw:layer="layout" svg:width="3.048cm" svg:height="2.54cm" svg:x="18.977cm" svg:y="53.936cm">
          <text:p text:style-name="P2"><text:span text:style-name="T1">Nimrod</text:span></text:p>
          <text:p text:style-name="P2"><text:span text:style-name="T8">1Ch 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65" draw:id="id65" draw:layer="layout" svg:width="3.048cm" svg:height="2.54cm" svg:x="27.263cm" svg:y="53.923cm">
          <text:p text:style-name="P2"><text:span text:style-name="T1">Anamim</text:span></text:p>
          <text:p text:style-name="P2"><text:span text:style-name="T2">1Ch 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0" xml:id="id40" draw:id="id40" draw:layer="layout" svg:width="3.048cm" svg:height="2.54cm" svg:x="23.703cm" svg:y="53.923cm">
          <text:p text:style-name="P8"><text:span text:style-name="T9">Ludim</text:span></text:p>
          <text:p text:style-name="P9"><text:span text:style-name="T10">1Ch 1:11</text:span></text:p>
          <text:p text:style-name="P8"><text:span text:style-name="T9">Lydians</text:span></text:p>
          <text:p text:style-name="P8"><text:span text:style-name="T11">Jer 46: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4" draw:text-style-name="P10" xml:id="id71" draw:id="id71" draw:layer="layout" svg:width="3.048cm" svg:height="2.54cm" svg:x="30.8cm" svg:y="53.923cm">
          <text:p text:style-name="P8"><text:span text:style-name="T9">Lehabim</text:span></text:p>
          <text:p text:style-name="P8"><text:span text:style-name="T10">1Ch 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 draw:text-style-name="P10" xml:id="id66" draw:id="id66" draw:layer="layout" svg:width="3.099cm" svg:height="2.54cm" svg:x="34.317cm" svg:y="53.924cm">
          <text:p text:style-name="P8"><text:span text:style-name="T9">Naphtuhim</text:span></text:p>
          <text:p text:style-name="P8"><text:span text:style-name="T10">1Ch 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 draw:text-style-name="P10" xml:id="id67" draw:id="id67" draw:layer="layout" svg:width="3.048cm" svg:height="2.54cm" svg:x="37.818cm" svg:y="53.925cm">
          <text:p text:style-name="P8"><text:span text:style-name="T9">Pathrusim</text:span></text:p>
          <text:p text:style-name="P8"><text:span text:style-name="T10">1Ch 1:12</text:span><text:span text:style-name="T12"> </text:span><text:span text:style-name="T13">Pathros</text:span></text:p>
          <text:p text:style-name="P8"><text:span text:style-name="T10">Jer 4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10" xml:id="id72" draw:id="id72" draw:layer="layout" svg:width="3.048cm" svg:height="2.54cm" svg:x="41.272cm" svg:y="53.926cm">
          <text:p text:style-name="P8"><text:span text:style-name="T9">Casluhim</text:span></text:p>
          <text:p text:style-name="P8"><text:span text:style-name="T10">1Ch 1: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10" xml:id="id73" draw:id="id73" draw:layer="layout" svg:width="3.251cm" svg:height="3.251cm" svg:x="44.805cm" svg:y="53.927cm">
          <text:p text:style-name="P8"><text:span text:style-name="T9">Caphthorim</text:span></text:p>
          <text:p text:style-name="P8"><text:span text:style-name="T10">1Ch 1:12</text:span></text:p>
          <text:p text:style-name="P8"><text:span text:style-name="T9">Caphtorim</text:span></text:p>
          <text:p text:style-name="P8"><text:span text:style-name="T10">Gen 10:14</text:span></text:p>
          <text:p text:style-name="P8"><text:span text:style-name="T13">Caphtor</text:span></text:p>
          <text:p text:style-name="P8"><text:span text:style-name="T10">Amo 9: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6.465cm" svg:y1="54.812cm" svg:x2="86.465cm" svg:y2="55.278cm" draw:start-shape="id41" draw:start-glue-point="2" draw:end-shape="id42" draw:end-glue-point="0" svg:d="M86465 54812v466" svg:viewBox="0 0 1 467">
          <text:p/>
        </draw:connector>
        <draw:connector draw:style-name="gr1" draw:text-style-name="P1" draw:layer="layout" draw:type="curve" svg:x1="86.465cm" svg:y1="58.308cm" svg:x2="86.472cm" svg:y2="59.496cm" draw:start-shape="id42" draw:start-glue-point="2" draw:end-shape="id43" draw:end-glue-point="0" svg:d="M86465 58308c0 892 7 299 7 1188" svg:viewBox="0 0 8 1189">
          <text:p/>
        </draw:connector>
        <draw:connector draw:style-name="gr2" draw:text-style-name="P1" draw:layer="layout" draw:type="curve" svg:x1="86.465cm" svg:y1="58.308cm" svg:x2="89.873cm" svg:y2="59.497cm" draw:start-shape="id42" draw:start-glue-point="2" draw:end-shape="id44" draw:end-glue-point="0" svg:d="M86465 58308c0 892 3408 298 3408 1189" svg:viewBox="0 0 3409 1190">
          <text:p/>
        </draw:connector>
        <draw:connector draw:style-name="gr1" draw:text-style-name="P1" draw:layer="layout" draw:type="curve" svg:x1="89.873cm" svg:y1="62.037cm" svg:x2="113.543cm" svg:y2="64.555cm" draw:start-shape="id44" draw:start-glue-point="2" draw:end-shape="id45" draw:end-glue-point="0" svg:d="M89873 62037c0 1890 23670 631 23670 2518" svg:viewBox="0 0 23671 2519">
          <text:p/>
        </draw:connector>
        <draw:connector draw:style-name="gr1" draw:text-style-name="P1" draw:layer="layout" draw:type="curve" svg:x1="89.873cm" svg:y1="62.037cm" svg:x2="110.088cm" svg:y2="64.557cm" draw:start-shape="id44" draw:start-glue-point="2" draw:end-shape="id46" draw:end-glue-point="0" svg:d="M89873 62037c0 1891 20215 632 20215 2520" svg:viewBox="0 0 20216 2521">
          <text:p/>
        </draw:connector>
        <draw:connector draw:style-name="gr7" draw:text-style-name="P1" draw:layer="layout" draw:type="curve" svg:x1="93.17cm" svg:y1="47.924cm" svg:x2="99.834cm" svg:y2="50.752cm" draw:start-shape="id47" draw:start-glue-point="2" draw:end-shape="id48" draw:end-glue-point="0" svg:d="M93170 47924c0 2122 6664 709 6664 2828" svg:viewBox="0 0 6665 2829">
          <text:p/>
        </draw:connector>
        <draw:connector draw:style-name="gr19" draw:text-style-name="P1" draw:layer="layout" draw:type="curve" svg:x1="86.46cm" svg:y1="51.08cm" svg:x2="86.465cm" svg:y2="51.714cm" draw:start-shape="id49" draw:start-glue-point="2" draw:end-shape="id41" draw:end-glue-point="0" svg:d="M86460 51080c0 477 5 160 5 634" svg:viewBox="0 0 6 635">
          <text:p/>
        </draw:connector>
        <draw:connector draw:style-name="gr1" draw:text-style-name="P1" draw:layer="layout" draw:type="curve" svg:x1="90.251cm" svg:y1="113.606cm" svg:x2="117.294cm" svg:y2="116.913cm" draw:start-shape="id50" draw:start-glue-point="2" draw:end-shape="id51" svg:d="M90251 113606c0 2481 27043 828 27043 3307" svg:viewBox="0 0 27044 3308">
          <text:p/>
        </draw:connector>
        <draw:connector draw:style-name="gr1" draw:text-style-name="P1" draw:layer="layout" draw:type="curve" svg:x1="90.251cm" svg:y1="113.606cm" svg:x2="120.695cm" svg:y2="116.914cm" draw:start-shape="id50" draw:start-glue-point="2" draw:end-shape="id52" draw:end-glue-point="0" svg:d="M90251 113606c0 828 7611 1655 15222 1655s15222 827 15222 1653" svg:viewBox="0 0 30445 3309">
          <text:p/>
        </draw:connector>
        <draw:connector draw:style-name="gr1" draw:text-style-name="P1" draw:layer="layout" draw:type="curve" svg:x1="90.251cm" svg:y1="113.606cm" svg:x2="124.113cm" svg:y2="116.915cm" draw:start-shape="id50" draw:start-glue-point="2" draw:end-shape="id53" draw:end-glue-point="0" svg:d="M90251 113606c0 828 8466 1655 16931 1655 8466 0 16931 827 16931 1654" svg:viewBox="0 0 33863 3310">
          <text:p/>
        </draw:connector>
        <draw:connector draw:style-name="gr1" draw:text-style-name="P1" draw:layer="layout" draw:type="curve" svg:x1="89.873cm" svg:y1="62.037cm" svg:x2="117.035cm" svg:y2="64.556cm" draw:start-shape="id44" draw:start-glue-point="2" draw:end-shape="id54" draw:end-glue-point="0" svg:d="M89873 62037c0 1890 27162 631 27162 2519" svg:viewBox="0 0 27163 2520">
          <text:p/>
        </draw:connector>
        <draw:connector draw:style-name="gr3" draw:text-style-name="P1" draw:layer="layout" draw:type="curve" svg:x1="67.587cm" svg:y1="50.061cm" svg:x2="57.009cm" svg:y2="61.615cm" draw:start-shape="id12" draw:start-glue-point="2" draw:end-shape="id55" draw:end-glue-point="0" svg:d="M67587 50061c0 8667-10578 2890-10578 11554" svg:viewBox="0 0 10579 11555">
          <text:p/>
        </draw:connector>
        <draw:connector draw:style-name="gr3" draw:text-style-name="P1" draw:layer="layout" draw:type="curve" svg:x1="67.587cm" svg:y1="50.061cm" svg:x2="60.558cm" svg:y2="61.615cm" draw:start-shape="id12" draw:start-glue-point="2" draw:end-shape="id56" draw:end-glue-point="0" svg:d="M67587 50061c0 8667-7029 2890-7029 11554" svg:viewBox="0 0 7030 11555">
          <text:p/>
        </draw:connector>
        <draw:connector draw:style-name="gr3" draw:text-style-name="P1" draw:layer="layout" draw:type="curve" svg:x1="67.587cm" svg:y1="50.061cm" svg:x2="64.164cm" svg:y2="61.615cm" draw:start-shape="id12" draw:start-glue-point="2" draw:end-shape="id57" draw:end-glue-point="0" svg:d="M67587 50061c0 8667-3423 2890-3423 11554" svg:viewBox="0 0 3424 11555">
          <text:p/>
        </draw:connector>
        <draw:connector draw:style-name="gr20" draw:text-style-name="P1" draw:layer="layout" draw:type="curve" svg:x1="67.587cm" svg:y1="50.061cm" svg:x2="77.879cm" svg:y2="61.633cm" draw:start-shape="id12" draw:start-glue-point="2" draw:end-shape="id58" draw:end-glue-point="0" svg:d="M67587 50061c0 8680 10292 2895 10292 11572" svg:viewBox="0 0 10293 11573">
          <text:p/>
        </draw:connector>
        <draw:connector draw:style-name="gr21" draw:text-style-name="P1" draw:layer="layout" draw:type="curve" svg:x1="67.587cm" svg:y1="50.061cm" svg:x2="81.272cm" svg:y2="61.633cm" draw:start-shape="id12" draw:start-glue-point="2" draw:end-shape="id59" draw:end-glue-point="0" svg:d="M67587 50061c0 8680 13685 2895 13685 11572" svg:viewBox="0 0 13686 11573">
          <text:p/>
        </draw:connector>
        <draw:connector draw:style-name="gr7" draw:text-style-name="P1" draw:layer="layout" draw:type="curve" svg:x1="86.444cm" svg:y1="44.076cm" svg:x2="79.692cm" svg:y2="45.4cm" draw:start-shape="id60" draw:start-glue-point="2" draw:end-shape="id61" draw:end-glue-point="0" svg:d="M86444 44076c0 994-6752 333-6752 1324" svg:viewBox="0 0 6753 1325">
          <text:p/>
        </draw:connector>
        <draw:connector draw:style-name="gr7" draw:text-style-name="P1" draw:layer="layout" draw:type="curve" svg:x1="86.444cm" svg:y1="44.076cm" svg:x2="83.056cm" svg:y2="45.4cm" draw:start-shape="id60" draw:start-glue-point="2" draw:end-shape="id62" draw:end-glue-point="0" svg:d="M86444 44076c0 994-3388 333-3388 1324" svg:viewBox="0 0 3389 1325">
          <text:p/>
        </draw:connector>
        <draw:connector draw:style-name="gr1" draw:text-style-name="P1" draw:layer="layout" draw:type="curve" svg:x1="86.444cm" svg:y1="44.076cm" svg:x2="86.46cm" svg:y2="45.4cm" draw:start-shape="id60" draw:start-glue-point="2" draw:end-shape="id63" draw:end-glue-point="0" svg:d="M86444 44076c0 994 16 333 16 1324" svg:viewBox="0 0 17 1325">
          <text:p/>
        </draw:connector>
        <draw:connector draw:style-name="gr7" draw:text-style-name="P1" draw:layer="layout" draw:type="curve" svg:x1="86.444cm" svg:y1="44.076cm" svg:x2="89.801cm" svg:y2="45.401cm" draw:start-shape="id60" draw:start-glue-point="2" draw:end-shape="id64" draw:end-glue-point="0" svg:d="M86444 44076c0 994 3357 332 3357 1325" svg:viewBox="0 0 3358 1326">
          <text:p/>
        </draw:connector>
        <draw:connector draw:style-name="gr3" draw:text-style-name="P1" draw:layer="layout" draw:type="curve" svg:x1="35.755cm" svg:y1="50.06cm" svg:x2="28.787cm" svg:y2="53.923cm" draw:start-shape="id37" draw:start-glue-point="2" draw:end-shape="id65" draw:end-glue-point="0" svg:d="M35755 50060c0 2898-6968 967-6968 3863" svg:viewBox="0 0 6969 3864">
          <text:p/>
        </draw:connector>
        <draw:connector draw:style-name="gr3" draw:text-style-name="P1" draw:layer="layout" draw:type="curve" svg:x1="35.755cm" svg:y1="50.06cm" svg:x2="35.866cm" svg:y2="53.924cm" draw:start-shape="id37" draw:start-glue-point="2" draw:end-shape="id66" draw:end-glue-point="0" svg:d="M35755 50060c0 2899 111 968 111 3864" svg:viewBox="0 0 112 3865">
          <text:p/>
        </draw:connector>
        <draw:connector draw:style-name="gr3" draw:text-style-name="P1" draw:layer="layout" draw:type="curve" svg:x1="35.755cm" svg:y1="50.06cm" svg:x2="39.342cm" svg:y2="53.925cm" draw:start-shape="id37" draw:start-glue-point="2" draw:end-shape="id67" draw:end-glue-point="0" svg:d="M35755 50060c0 2899 3587 967 3587 3865" svg:viewBox="0 0 3588 3866">
          <text:p/>
        </draw:connector>
        <draw:connector draw:style-name="gr3" draw:text-style-name="P1" draw:layer="layout" draw:type="curve" svg:x1="67.587cm" svg:y1="50.061cm" svg:x2="67.529cm" svg:y2="61.615cm" draw:start-shape="id12" draw:start-glue-point="2" draw:end-shape="id68" draw:end-glue-point="0" svg:d="M67587 50061c0 8667-58 2890-58 11554" svg:viewBox="0 0 59 11555">
          <text:p/>
        </draw:connector>
        <draw:connector draw:style-name="gr3" draw:text-style-name="P1" draw:layer="layout" draw:type="curve" svg:x1="67.587cm" svg:y1="50.061cm" svg:x2="71.021cm" svg:y2="61.633cm" draw:start-shape="id12" draw:start-glue-point="2" draw:end-shape="id69" draw:end-glue-point="0" svg:d="M67587 50061c0 8680 3434 2895 3434 11572" svg:viewBox="0 0 3435 11573">
          <text:p/>
        </draw:connector>
        <draw:connector draw:style-name="gr20" draw:text-style-name="P1" draw:layer="layout" draw:type="curve" svg:x1="67.587cm" svg:y1="50.061cm" svg:x2="74.387cm" svg:y2="61.633cm" draw:start-shape="id12" draw:start-glue-point="2" draw:end-shape="id70" draw:end-glue-point="0" svg:d="M67587 50061c0 8680 6800 2895 6800 11572" svg:viewBox="0 0 6801 11573">
          <text:p/>
        </draw:connector>
        <draw:connector draw:style-name="gr3" draw:text-style-name="P1" draw:layer="layout" draw:type="curve" svg:x1="35.755cm" svg:y1="50.06cm" svg:x2="32.324cm" svg:y2="53.923cm" draw:start-shape="id37" draw:start-glue-point="2" draw:end-shape="id71" draw:end-glue-point="0" svg:d="M35755 50060c0 2898-3431 967-3431 3863" svg:viewBox="0 0 3432 3864">
          <text:p/>
        </draw:connector>
        <draw:connector draw:style-name="gr3" draw:text-style-name="P1" draw:layer="layout" draw:type="curve" svg:x1="35.755cm" svg:y1="50.06cm" svg:x2="42.796cm" svg:y2="53.926cm" draw:start-shape="id37" draw:start-glue-point="2" draw:end-shape="id72" draw:end-glue-point="0" svg:d="M35755 50060c0 2901 7041 968 7041 3866" svg:viewBox="0 0 7042 3867">
          <text:p/>
        </draw:connector>
        <draw:connector draw:style-name="gr3" draw:text-style-name="P1" draw:layer="layout" draw:type="curve" svg:x1="35.755cm" svg:y1="50.06cm" svg:x2="46.43cm" svg:y2="53.927cm" draw:start-shape="id37" draw:start-glue-point="2" draw:end-shape="id73" draw:end-glue-point="0" svg:d="M35755 50060c0 2901 10675 968 10675 3867" svg:viewBox="0 0 10676 3868">
          <text:p/>
        </draw:connector>
        <draw:connector draw:style-name="gr7" draw:text-style-name="P1" draw:layer="layout" draw:type="curve" svg:x1="86.444cm" svg:y1="44.076cm" svg:x2="93.17cm" svg:y2="45.384cm" draw:start-shape="id60" draw:start-glue-point="2" draw:end-shape="id47" draw:end-glue-point="0" svg:d="M86444 44076c0 982 6726 329 6726 1308" svg:viewBox="0 0 6727 1309">
          <text:p/>
        </draw:connector>
        <draw:connector draw:style-name="gr22" draw:text-style-name="P1" draw:layer="layout" draw:type="curve" svg:x1="93.17cm" svg:y1="47.924cm" svg:x2="93.175cm" svg:y2="50.753cm" draw:start-shape="id47" draw:start-glue-point="2" draw:end-shape="id74" draw:end-glue-point="0" svg:d="M93170 47924c0 2122 5 708 5 2829" svg:viewBox="0 0 6 2830">
          <text:p/>
        </draw:connector>
        <draw:connector draw:style-name="gr7" draw:text-style-name="P1" draw:layer="layout" draw:type="curve" svg:x1="93.17cm" svg:y1="47.924cm" svg:x2="96.478cm" svg:y2="50.754cm" draw:start-shape="id47" draw:start-glue-point="2" draw:end-shape="id75" draw:end-glue-point="0" svg:d="M93170 47924c0 2124 3308 709 3308 2830" svg:viewBox="0 0 3309 2831">
          <text:p/>
        </draw:connector>
        <draw:custom-shape draw:style-name="gr4" draw:text-style-name="P3" xml:id="id14" draw:id="id14" draw:layer="layout" svg:width="3.048cm" svg:height="2.54cm" svg:x="48.727cm" svg:y="61.615cm">
          <text:p text:style-name="P2"><text:span text:style-name="T1">Heth</text:span></text:p>
          <text:p text:style-name="P2"><text:span text:style-name="T2">1Ch 1: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3" draw:id="id13" draw:layer="layout" svg:width="3.048cm" svg:height="2.54cm" svg:x="45.325cm" svg:y="61.615cm">
          <text:p text:style-name="P2"><text:span text:style-name="T14">Zidon</text:span></text:p>
          <text:p text:style-name="P2"><text:span text:style-name="T2">1Ch 1:13</text:span></text:p>
          <text:p text:style-name="P2"><text:span text:style-name="T1">Sidon</text:span></text:p>
          <text:p text:style-name="P2"><text:span text:style-name="T2">Gen 10: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3" draw:text-style-name="P7" xml:id="id15" draw:id="id15" draw:layer="layout" svg:width="3.048cm" svg:height="3.663cm" svg:x="52.093cm" svg:y="61.615cm">
          <text:p text:style-name="P2"><text:span text:style-name="T1">Jebusite(s)</text:span></text:p>
          <text:p text:style-name="P2"><text:span text:style-name="T2">1Ch 1:14</text:span></text:p>
          <text:p text:style-name="P2"><text:span text:style-name="T1">Jebusi</text:span></text:p>
          <text:p text:style-name="P2"><text:span text:style-name="T2">Jos 18:28</text:span></text:p>
          <text:p text:style-name="P2"><text:span text:style-name="T7">Jebus</text:span></text:p>
          <text:p text:style-name="P2"><text:span text:style-name="T2">Jdg 19:10,11</text:span></text:p>
          <text:p text:style-name="P2"><text:span text:style-name="T2">1Ch 11:4,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55" draw:id="id55" draw:layer="layout" svg:width="3.048cm" svg:height="2.54cm" svg:x="55.485cm" svg:y="61.615cm">
          <text:p text:style-name="P2"><text:span text:style-name="T1">Amorite(s)</text:span></text:p>
          <text:p text:style-name="P2"><text:span text:style-name="T2">1Ch 1: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 draw:text-style-name="P7" xml:id="id56" draw:id="id56" draw:layer="layout" svg:width="3.353cm" svg:height="2.54cm" svg:x="58.882cm" svg:y="61.615cm">
          <text:p text:style-name="P2"><text:span text:style-name="T1">Girgashite(s)</text:span></text:p>
          <text:p text:style-name="P2"><text:span text:style-name="T2">1Ch 1:14</text:span></text:p>
          <text:p text:style-name="P2"><text:span text:style-name="T1">Girgasite</text:span></text:p>
          <text:p text:style-name="P2"><text:span text:style-name="T2">Gen 10: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57" draw:id="id57" draw:layer="layout" svg:width="3.048cm" svg:height="2.54cm" svg:x="62.64cm" svg:y="61.615cm">
          <text:p text:style-name="P2"><text:span text:style-name="T1">Hivite(s)</text:span></text:p>
          <text:p text:style-name="P2"><text:span text:style-name="T2">1Ch 1: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68" draw:id="id68" draw:layer="layout" svg:width="3.048cm" svg:height="2.54cm" svg:x="66.005cm" svg:y="61.615cm">
          <text:p text:style-name="P2"><text:span text:style-name="T1">Arkite</text:span></text:p>
          <text:p text:style-name="P2"><text:span text:style-name="T2">1Ch 1: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69" draw:id="id69" draw:layer="layout" svg:width="3.048cm" svg:height="2.54cm" svg:x="69.497cm" svg:y="61.633cm">
          <text:p text:style-name="P2"><text:span text:style-name="T1">Sinite</text:span></text:p>
          <text:p text:style-name="P2"><text:span text:style-name="T2">1Ch 1: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70" draw:id="id70" draw:layer="layout" svg:width="3.048cm" svg:height="2.54cm" svg:x="72.863cm" svg:y="61.633cm">
          <text:p text:style-name="P2"><text:span text:style-name="T1">Arvadite</text:span></text:p>
          <text:p text:style-name="P2"><text:span text:style-name="T2">1Ch 1: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58" draw:id="id58" draw:layer="layout" svg:width="3.048cm" svg:height="2.54cm" svg:x="76.355cm" svg:y="61.633cm">
          <text:p text:style-name="P2"><text:span text:style-name="T1">Zemarite</text:span></text:p>
          <text:p text:style-name="P2"><text:span text:style-name="T2">1Ch 1: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59" draw:id="id59" draw:layer="layout" svg:width="3.048cm" svg:height="2.54cm" svg:x="79.748cm" svg:y="61.633cm">
          <text:p text:style-name="P2"><text:span text:style-name="T1">Hamathite</text:span></text:p>
          <text:p text:style-name="P2"><text:span text:style-name="T2">1Ch 1: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 draw:text-style-name="P3" xml:id="id62" draw:id="id62" draw:layer="layout" svg:width="3.099cm" svg:height="2.896cm" svg:x="81.507cm" svg:y="45.4cm">
          <text:p text:style-name="P2"><text:span text:style-name="T1">Asshur</text:span></text:p>
          <text:p text:style-name="P4"><text:span text:style-name="T2">1Ch 1:17</text:span></text:p>
          <text:p text:style-name="P2"><text:span text:style-name="T8">Assyrian(s)</text:span></text:p>
          <text:p text:style-name="P2"><text:span text:style-name="T8">Assyr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61" draw:id="id61" draw:layer="layout" svg:width="3.048cm" svg:height="2.54cm" svg:x="78.168cm" svg:y="45.4cm">
          <text:p text:style-name="P2"><text:span text:style-name="T1">Elam</text:span></text:p>
          <text:p text:style-name="P2"><text:span text:style-name="T2">1Ch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63" draw:id="id63" draw:layer="layout" svg:width="3.048cm" svg:height="2.54cm" svg:x="84.936cm" svg:y="45.4cm">
          <text:p text:style-name="P2"><text:span text:style-name="T1">Arphaxad</text:span></text:p>
          <text:p text:style-name="P2"><text:span text:style-name="T2">1Ch 1:17</text:span></text:p>
          <text:p text:style-name="P2"><text:span text:style-name="T2">Gen 1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64" draw:id="id64" draw:layer="layout" svg:width="3.048cm" svg:height="2.54cm" svg:x="88.277cm" svg:y="45.401cm">
          <text:p text:style-name="P2"><text:span text:style-name="T1">Lud</text:span></text:p>
          <text:p text:style-name="P4"><text:span text:style-name="T2">1Ch 1:17</text:span></text:p>
          <text:p text:style-name="P4"><text:span text:style-name="T1">Lydia</text:span></text:p>
          <text:p text:style-name="P4"><text:span text:style-name="T2">Eze 30: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7" draw:id="id47" draw:layer="layout" svg:width="3.048cm" svg:height="2.54cm" svg:x="91.646cm" svg:y="45.384cm">
          <text:p text:style-name="P2"><text:span text:style-name="T1">Aram</text:span></text:p>
          <text:p text:style-name="P2"><text:span text:style-name="T2">1Ch 1:17</text:span></text:p>
          <text:p text:style-name="P2"><text:span text:style-name="T2">Gen 10:22-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4" draw:id="id74" draw:layer="layout" svg:width="3.048cm" svg:height="2.54cm" svg:x="91.651cm" svg:y="50.753cm">
          <text:p text:style-name="P2"><text:span text:style-name="T1">Uz</text:span></text:p>
          <text:p text:style-name="P2"><text:span text:style-name="T2">1Ch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5" draw:id="id75" draw:layer="layout" svg:width="3.048cm" svg:height="2.54cm" svg:x="94.954cm" svg:y="50.754cm">
          <text:p text:style-name="P2"><text:span text:style-name="T1">Hul</text:span></text:p>
          <text:p text:style-name="P2"><text:span text:style-name="T2">1Ch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8" draw:id="id48" draw:layer="layout" svg:width="3.048cm" svg:height="2.54cm" svg:x="98.31cm" svg:y="50.752cm">
          <text:p text:style-name="P2"><text:span text:style-name="T1">Gether</text:span></text:p>
          <text:p text:style-name="P2"><text:span text:style-name="T2">1Ch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8" draw:id="id178" draw:layer="layout" svg:width="3.048cm" svg:height="2.54cm" svg:x="101.613cm" svg:y="50.753cm">
          <text:p text:style-name="P2"><text:span text:style-name="T1">Meshech</text:span></text:p>
          <text:p text:style-name="P2"><text:span text:style-name="T4">1Ch 1:17</text:span></text:p>
          <text:p text:style-name="P2"><text:span text:style-name="T1">Mash</text:span></text:p>
          <text:p text:style-name="P4"><text:span text:style-name="T2">Gen 10: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6" draw:text-style-name="P11" xml:id="id41" draw:id="id41" draw:layer="layout" svg:width="3.048cm" svg:height="3.098cm" svg:x="84.941cm" svg:y="51.714cm">
          <text:p text:style-name="P4"><text:span text:style-name="T1">Salah</text:span></text:p>
          <text:p text:style-name="P4"><text:span text:style-name="T4">Gen 10:24</text:span></text:p>
          <text:p text:style-name="P4"><text:span text:style-name="T1">Shelah</text:span></text:p>
          <text:p text:style-name="P4"><text:span text:style-name="T2">1Ch 1:18</text:span></text:p>
          <text:p text:style-name="P4"><text:span text:style-name="T3">Sala</text:span></text:p>
          <text:p text:style-name="P4"><text:span text:style-name="T2">Luk 3:3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7" draw:text-style-name="P3" xml:id="id42" draw:id="id42" draw:layer="layout" svg:width="3.048cm" svg:height="3.03cm" svg:x="84.941cm" svg:y="55.278cm">
          <text:p text:style-name="P2"><text:span text:style-name="T1">Eber</text:span></text:p>
          <text:p text:style-name="P2"><text:span text:style-name="T2">1Ch 1:18</text:span></text:p>
          <text:p text:style-name="P2"><text:span text:style-name="T2">Gen 11:14</text:span></text:p>
          <text:p text:style-name="P2"><text:span text:style-name="T2">Num 24:24</text:span></text:p>
          <text:p text:style-name="P4"><text:span text:style-name="T3">Heber</text:span></text:p>
          <text:p text:style-name="P4"><text:span text:style-name="T2">Luk 3:3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3" draw:id="id43" draw:layer="layout" svg:width="3.048cm" svg:height="2.54cm" svg:x="84.948cm" svg:y="59.496cm">
          <text:p text:style-name="P2"><text:span text:style-name="T1">Peleg</text:span></text:p>
          <text:p text:style-name="P2"><text:span text:style-name="T2">1Ch 1:19</text:span></text:p>
          <text:p text:style-name="P2"><text:span text:style-name="T2">Gen 11:16</text:span></text:p>
          <text:p text:style-name="P4"><text:span text:style-name="T3">Phalec</text:span></text:p>
          <text:p text:style-name="P4"><text:span text:style-name="T2">Luk 3:3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4" draw:id="id44" draw:layer="layout" svg:width="3.048cm" svg:height="2.54cm" svg:x="88.349cm" svg:y="59.497cm">
          <text:p text:style-name="P2"><text:span text:style-name="T1">Joktan</text:span></text:p>
          <text:p text:style-name="P2"><text:span text:style-name="T2">1Ch 1:19</text:span></text:p>
          <text:p text:style-name="P2"><text:span text:style-name="T2">Gen 10: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7" draw:id="id77" draw:layer="layout" svg:width="3.048cm" svg:height="2.54cm" svg:x="91.651cm" svg:y="64.553cm">
          <text:p text:style-name="P2"><text:span text:style-name="T1">Sheleph</text:span></text:p>
          <text:p text:style-name="P2"><text:span text:style-name="T2">1Ch 1:20</text:span></text:p>
          <text:p text:style-name="P4"><text:span text:style-name="T2">Gen 10: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6" draw:id="id76" draw:layer="layout" svg:width="3.048cm" svg:height="2.54cm" svg:x="88.38cm" svg:y="64.553cm">
          <text:p text:style-name="P2"><text:span text:style-name="T1">Almodad</text:span></text:p>
          <text:p text:style-name="P2"><text:span text:style-name="T2">1Ch 1:20</text:span></text:p>
          <text:p text:style-name="P2"><text:span text:style-name="T2">Gen 10: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3" xml:id="id78" draw:id="id78" draw:layer="layout" svg:width="3.505cm" svg:height="2.54cm" svg:x="94.904cm" svg:y="64.553cm">
          <text:p text:style-name="P2"><text:span text:style-name="T1">Hazarmaveth</text:span></text:p>
          <text:p text:style-name="P2"><text:span text:style-name="T2">1Ch 1:20</text:span></text:p>
          <text:p text:style-name="P4"><text:span text:style-name="T2">Gen 10: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9" draw:id="id79" draw:layer="layout" svg:width="3.048cm" svg:height="2.54cm" svg:x="98.578cm" svg:y="64.554cm">
          <text:p text:style-name="P2"><text:span text:style-name="T1">Jerah</text:span></text:p>
          <text:p text:style-name="P2"><text:span text:style-name="T2">1Ch 1:20</text:span></text:p>
          <text:p text:style-name="P4"><text:span text:style-name="T2">Gen 10: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0" draw:id="id80" draw:layer="layout" svg:width="3.048cm" svg:height="2.54cm" svg:x="101.862cm" svg:y="64.555cm">
          <text:p text:style-name="P2"><text:span text:style-name="T1">Hadoram</text:span></text:p>
          <text:p text:style-name="P2"><text:span text:style-name="T2">1Ch 1:21</text:span></text:p>
          <text:p text:style-name="P4"><text:span text:style-name="T2">Gen 10:2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1" draw:id="id81" draw:layer="layout" svg:width="3.048cm" svg:height="2.54cm" svg:x="105.163cm" svg:y="64.556cm">
          <text:p text:style-name="P2"><text:span text:style-name="T1">Uzal</text:span></text:p>
          <text:p text:style-name="P2"><text:span text:style-name="T2">1Ch 1:21</text:span></text:p>
          <text:p text:style-name="P4"><text:span text:style-name="T2">Gen 10: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6" draw:id="id46" draw:layer="layout" svg:width="3.048cm" svg:height="2.54cm" svg:x="108.564cm" svg:y="64.557cm">
          <text:p text:style-name="P2"><text:span text:style-name="T1">Diklah</text:span></text:p>
          <text:p text:style-name="P2"><text:span text:style-name="T2">1Ch 1:21</text:span></text:p>
          <text:p text:style-name="P4"><text:span text:style-name="T2">Gen 10: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5" draw:id="id45" draw:layer="layout" svg:width="3.048cm" svg:height="2.54cm" svg:x="112.019cm" svg:y="64.555cm">
          <text:p text:style-name="P2"><text:span text:style-name="T1">Ebal</text:span></text:p>
          <text:p text:style-name="P2"><text:span text:style-name="T2">1Ch 1:22</text:span></text:p>
          <text:p text:style-name="P2"><text:span text:style-name="T7">Obal</text:span></text:p>
          <text:p text:style-name="P4"><text:span text:style-name="T2">Gen 10:2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54" draw:id="id54" draw:layer="layout" svg:width="3.048cm" svg:height="2.54cm" svg:x="115.511cm" svg:y="64.556cm">
          <text:p text:style-name="P2"><text:span text:style-name="T1">Abimael</text:span></text:p>
          <text:p text:style-name="P2"><text:span text:style-name="T2">1Ch 1:22</text:span></text:p>
          <text:p text:style-name="P4"><text:span text:style-name="T2">Gen 10:2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2" draw:id="id82" draw:layer="layout" svg:width="3.048cm" svg:height="2.54cm" svg:x="118.864cm" svg:y="64.557cm">
          <text:p text:style-name="P2"><text:span text:style-name="T1">Sheba</text:span></text:p>
          <text:p text:style-name="P2"><text:span text:style-name="T2">1Ch 1:22</text:span></text:p>
          <text:p text:style-name="P4"><text:span text:style-name="T2">Gen 10:2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3" draw:id="id83" draw:layer="layout" svg:width="3.048cm" svg:height="2.54cm" svg:x="122.265cm" svg:y="64.558cm">
          <text:p text:style-name="P2"><text:span text:style-name="T1">Ophir</text:span></text:p>
          <text:p text:style-name="P2"><text:span text:style-name="T2">1Ch 1:23</text:span></text:p>
          <text:p text:style-name="P4"><text:span text:style-name="T2">Gen 10: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4" draw:id="id84" draw:layer="layout" svg:width="3.048cm" svg:height="2.54cm" svg:x="125.566cm" svg:y="64.559cm">
          <text:p text:style-name="P2"><text:span text:style-name="T1">Havilah</text:span></text:p>
          <text:p text:style-name="P2"><text:span text:style-name="T2">1Ch 1:23</text:span></text:p>
          <text:p text:style-name="P4"><text:span text:style-name="T2">Gen 10: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5" draw:id="id85" draw:layer="layout" svg:width="3.048cm" svg:height="2.54cm" svg:x="128.966cm" svg:y="64.559cm">
          <text:p text:style-name="P2"><text:span text:style-name="T1">Jobab</text:span></text:p>
          <text:p text:style-name="P2"><text:span text:style-name="T2">1Ch 1:23</text:span></text:p>
          <text:p text:style-name="P4"><text:span text:style-name="T2">Gen 10: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9.873cm" svg:y1="62.037cm" svg:x2="89.904cm" svg:y2="64.553cm" draw:start-shape="id44" draw:start-glue-point="2" draw:end-shape="id76" draw:end-glue-point="0" svg:d="M89873 62037c0 1888 31 631 31 2516" svg:viewBox="0 0 32 2517">
          <text:p/>
        </draw:connector>
        <draw:connector draw:style-name="gr1" draw:text-style-name="P1" draw:layer="layout" draw:type="curve" svg:x1="89.873cm" svg:y1="62.037cm" svg:x2="93.175cm" svg:y2="64.553cm" draw:start-shape="id44" draw:start-glue-point="2" draw:end-shape="id77" draw:end-glue-point="0" svg:d="M89873 62037c0 1888 3302 631 3302 2516" svg:viewBox="0 0 3303 2517">
          <text:p/>
        </draw:connector>
        <draw:connector draw:style-name="gr1" draw:text-style-name="P1" draw:layer="layout" draw:type="curve" svg:x1="89.873cm" svg:y1="62.037cm" svg:x2="96.656cm" svg:y2="64.553cm" draw:start-shape="id44" draw:start-glue-point="2" draw:end-shape="id78" draw:end-glue-point="0" svg:d="M89873 62037c0 1888 6783 631 6783 2516" svg:viewBox="0 0 6784 2517">
          <text:p/>
        </draw:connector>
        <draw:connector draw:style-name="gr1" draw:text-style-name="P1" draw:layer="layout" draw:type="curve" svg:x1="89.873cm" svg:y1="62.037cm" svg:x2="100.102cm" svg:y2="64.554cm" draw:start-shape="id44" draw:start-glue-point="2" draw:end-shape="id79" draw:end-glue-point="0" svg:d="M89873 62037c0 1888 10229 630 10229 2517" svg:viewBox="0 0 10230 2518">
          <text:p/>
        </draw:connector>
        <draw:connector draw:style-name="gr1" draw:text-style-name="P1" draw:layer="layout" draw:type="curve" svg:x1="89.873cm" svg:y1="62.037cm" svg:x2="103.386cm" svg:y2="64.555cm" draw:start-shape="id44" draw:start-glue-point="2" draw:end-shape="id80" draw:end-glue-point="0" svg:d="M89873 62037c0 1890 13513 631 13513 2518" svg:viewBox="0 0 13514 2519">
          <text:p/>
        </draw:connector>
        <draw:connector draw:style-name="gr1" draw:text-style-name="P1" draw:layer="layout" draw:type="curve" svg:x1="89.873cm" svg:y1="62.037cm" svg:x2="106.687cm" svg:y2="64.556cm" draw:start-shape="id44" draw:start-glue-point="2" draw:end-shape="id81" draw:end-glue-point="0" svg:d="M89873 62037c0 1890 16814 631 16814 2519" svg:viewBox="0 0 16815 2520">
          <text:p/>
        </draw:connector>
        <draw:connector draw:style-name="gr1" draw:text-style-name="P1" draw:layer="layout" draw:type="curve" svg:x1="89.873cm" svg:y1="62.037cm" svg:x2="120.388cm" svg:y2="64.557cm" draw:start-shape="id44" draw:start-glue-point="2" draw:end-shape="id82" draw:end-glue-point="0" svg:d="M89873 62037c0 1891 30515 632 30515 2520" svg:viewBox="0 0 30516 2521">
          <text:p/>
        </draw:connector>
        <draw:connector draw:style-name="gr1" draw:text-style-name="P1" draw:layer="layout" draw:type="curve" svg:x1="89.873cm" svg:y1="62.037cm" svg:x2="123.789cm" svg:y2="64.558cm" draw:start-shape="id44" draw:start-glue-point="2" draw:end-shape="id83" draw:end-glue-point="0" svg:d="M89873 62037c0 1891 33916 631 33916 2521" svg:viewBox="0 0 33917 2522">
          <text:p/>
        </draw:connector>
        <draw:connector draw:style-name="gr1" draw:text-style-name="P1" draw:layer="layout" draw:type="curve" svg:x1="89.873cm" svg:y1="62.037cm" svg:x2="127.09cm" svg:y2="64.559cm" draw:start-shape="id44" draw:start-glue-point="2" draw:end-shape="id84" draw:end-glue-point="0" svg:d="M89873 62037c0 1893 37217 632 37217 2522" svg:viewBox="0 0 37218 2523">
          <text:p/>
        </draw:connector>
        <draw:connector draw:style-name="gr1" draw:text-style-name="P1" draw:layer="layout" draw:type="curve" svg:x1="89.873cm" svg:y1="62.037cm" svg:x2="130.49cm" svg:y2="64.559cm" draw:start-shape="id44" draw:start-glue-point="2" draw:end-shape="id85" draw:end-glue-point="0" svg:d="M89873 62037c0 1893 40617 632 40617 2522" svg:viewBox="0 0 40618 2523">
          <text:p/>
        </draw:connector>
        <draw:connector draw:style-name="gr1" draw:text-style-name="P1" draw:layer="layout" draw:type="curve" svg:x1="86.472cm" svg:y1="62.036cm" svg:x2="86.473cm" svg:y2="64.597cm" draw:start-shape="id43" draw:start-glue-point="2" draw:end-shape="id86" draw:end-glue-point="0" svg:d="M86472 62036c0 1921 1 641 1 2561" svg:viewBox="0 0 2 2562">
          <text:p/>
        </draw:connector>
        <draw:connector draw:style-name="gr1" draw:text-style-name="P1" draw:layer="layout" draw:type="curve" svg:x1="90.251cm" svg:y1="113.606cm" svg:x2="103.8cm" svg:y2="116.912cm" draw:start-shape="id50" draw:start-glue-point="2" draw:end-shape="id87" draw:end-glue-point="0" svg:d="M90251 113606c0 827 3387 1654 6775 1654 3387 0 6774 826 6774 1652" svg:viewBox="0 0 13550 3307">
          <text:p/>
        </draw:connector>
        <draw:custom-shape draw:style-name="gr4" draw:text-style-name="P3" xml:id="id86" draw:id="id86" draw:layer="layout" svg:width="3.048cm" svg:height="2.54cm" svg:x="84.949cm" svg:y="64.597cm">
          <text:p text:style-name="P2"><text:span text:style-name="T1">Reu</text:span></text:p>
          <text:p text:style-name="P2"><text:span text:style-name="T2">1Ch 1:25</text:span></text:p>
          <text:p text:style-name="P2"><text:span text:style-name="T2">Gen 11:18</text:span></text:p>
          <text:p text:style-name="P4"><text:span text:style-name="T3">Ragau</text:span></text:p>
          <text:p text:style-name="P4"><text:span text:style-name="T2">Luk 3:3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8" draw:id="id88" draw:layer="layout" svg:width="3.048cm" svg:height="2.54cm" svg:x="84.953cm" svg:y="68.298cm">
          <text:p text:style-name="P2"><text:span text:style-name="T1">Serug</text:span></text:p>
          <text:p text:style-name="P2"><text:span text:style-name="T2">1Ch 1:26</text:span></text:p>
          <text:p text:style-name="P2"><text:span text:style-name="T2">Gen 11:20</text:span></text:p>
          <text:p text:style-name="P4"><text:span text:style-name="T3">Saruch</text:span></text:p>
          <text:p text:style-name="P4"><text:span text:style-name="T2">Luk 3:3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9" draw:id="id89" draw:layer="layout" svg:width="3.048cm" svg:height="2.54cm" svg:x="84.953cm" svg:y="71.498cm">
          <text:p text:style-name="P2"><text:span text:style-name="T1">Nahor</text:span></text:p>
          <text:p text:style-name="P2"><text:span text:style-name="T2">1Ch 1:26</text:span></text:p>
          <text:p text:style-name="P2"><text:span text:style-name="T2">Gen 11: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0" draw:id="id90" draw:layer="layout" svg:width="3.048cm" svg:height="2.54cm" svg:x="84.953cm" svg:y="74.602cm">
          <text:p text:style-name="P2"><text:span text:style-name="T1">Terah</text:span></text:p>
          <text:p text:style-name="P2"><text:span text:style-name="T8">1Ch 1:26</text:span></text:p>
          <text:p text:style-name="P2"><text:span text:style-name="T8">Gen 11: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1" draw:id="id91" draw:layer="layout" svg:width="3.048cm" svg:height="2.54cm" svg:x="84.953cm" svg:y="105.898cm">
          <text:p text:style-name="P2"><text:span text:style-name="T1">Abram</text:span></text:p>
          <text:p text:style-name="P2"><text:span text:style-name="T1">Abraham</text:span></text:p>
          <text:p text:style-name="P2"><text:span text:style-name="T2">1Ch 1:27</text:span></text:p>
          <text:p text:style-name="P2"><text:span text:style-name="T2">Gen 11: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6.477cm" svg:y1="70.838cm" svg:x2="86.477cm" svg:y2="71.498cm" draw:start-shape="id88" draw:start-glue-point="2" draw:end-shape="id89" draw:end-glue-point="0" svg:d="M86477 70838v660" svg:viewBox="0 0 1 661">
          <text:p/>
        </draw:connector>
        <draw:connector draw:style-name="gr1" draw:text-style-name="P1" draw:layer="layout" draw:type="curve" svg:x1="86.477cm" svg:y1="74.038cm" svg:x2="86.477cm" svg:y2="74.602cm" draw:start-shape="id89" draw:start-glue-point="2" draw:end-shape="id90" draw:end-glue-point="0" svg:d="M86477 74038v564" svg:viewBox="0 0 1 565">
          <text:p/>
        </draw:connector>
        <draw:connector draw:style-name="gr1" draw:text-style-name="P1" draw:layer="layout" draw:type="curve" svg:x1="86.477cm" svg:y1="77.142cm" svg:x2="86.477cm" svg:y2="105.898cm" draw:start-shape="id90" draw:start-glue-point="2" draw:end-shape="id91" draw:end-glue-point="0" svg:d="M86477 77142v28756" svg:viewBox="0 0 1 28757">
          <text:p/>
        </draw:connector>
        <draw:connector draw:style-name="gr1" draw:text-style-name="P1" draw:layer="layout" draw:type="curve" svg:x1="86.473cm" svg:y1="67.137cm" svg:x2="86.477cm" svg:y2="68.298cm" draw:start-shape="id86" draw:start-glue-point="2" draw:end-shape="id88" draw:end-glue-point="0" svg:d="M86473 67137c0 291 1 581 2 581s2 290 2 580" svg:viewBox="0 0 5 1162">
          <text:p/>
        </draw:connector>
        <draw:custom-shape draw:style-name="gr4" draw:text-style-name="P3" xml:id="id50" draw:id="id50" draw:layer="layout" svg:width="3.048cm" svg:height="2.54cm" svg:x="88.727cm" svg:y="111.066cm">
          <text:p text:style-name="P2"><text:span text:style-name="T1">Ishmael</text:span></text:p>
          <text:p text:style-name="P2"><text:span text:style-name="T2">1Ch 1:28</text:span></text:p>
          <text:p text:style-name="P2"><text:span text:style-name="T2">Gen 1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5" draw:id="id95" draw:layer="layout" svg:width="3.048cm" svg:height="2.54cm" svg:x="84.968cm" svg:y="111.066cm">
          <text:p text:style-name="P2"><text:span text:style-name="T1">Isaac</text:span></text:p>
          <text:p text:style-name="P2"><text:span text:style-name="T2">1Ch 1:28,3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90.223cm" svg:y1="107.166cm" svg:x2="90.251cm" svg:y2="111.066cm" draw:start-shape="id92" draw:start-glue-point="0" draw:end-shape="id50" draw:end-glue-point="0" svg:d="M90223 107166c0 2964 28 1014 28 3900" svg:viewBox="0 0 29 3901">
          <text:p/>
        </draw:connector>
        <draw:connector draw:style-name="gr1" draw:text-style-name="P1" draw:layer="layout" draw:type="curve" svg:x1="90.251cm" svg:y1="113.606cm" svg:x2="97.025cm" svg:y2="116.911cm" draw:start-shape="id50" draw:start-glue-point="2" draw:end-shape="id93" draw:end-glue-point="0" svg:d="M90251 113606c0 827 1694 1653 3387 1653 1694 0 3387 826 3387 1652" svg:viewBox="0 0 6775 3306">
          <text:p/>
        </draw:connector>
        <draw:connector draw:style-name="gr1" draw:text-style-name="P1" draw:layer="layout" draw:type="curve" svg:x1="90.251cm" svg:y1="113.606cm" svg:x2="100.204cm" svg:y2="116.911cm" draw:start-shape="id50" draw:start-glue-point="2" draw:end-shape="id94" draw:end-glue-point="0" svg:d="M90251 113606c0 827 2488 1653 4977 1653 2488 0 4976 826 4976 1652" svg:viewBox="0 0 9954 3306">
          <text:p/>
        </draw:connector>
        <draw:connector draw:style-name="gr1" draw:text-style-name="P1" draw:layer="layout" draw:type="curve" svg:x1="86.477cm" svg:y1="108.438cm" svg:x2="86.492cm" svg:y2="111.066cm" draw:start-shape="id91" draw:start-glue-point="2" draw:end-shape="id95" draw:end-glue-point="0" svg:d="M86477 108438c0 1972 15 659 15 2628" svg:viewBox="0 0 16 2629">
          <text:p/>
        </draw:connector>
        <draw:connector draw:style-name="gr1" draw:text-style-name="P1" draw:layer="layout" draw:type="curve" svg:x1="90.251cm" svg:y1="113.606cm" svg:x2="107.138cm" svg:y2="116.913cm" draw:start-shape="id50" draw:start-glue-point="2" draw:end-shape="id96" draw:end-glue-point="0" svg:d="M90251 113606c0 827 4222 1654 8444 1654 4221 0 8443 827 8443 1653" svg:viewBox="0 0 16888 3308">
          <text:p/>
        </draw:connector>
        <draw:connector draw:style-name="gr1" draw:text-style-name="P1" draw:layer="layout" draw:type="curve" svg:x1="90.251cm" svg:y1="113.606cm" svg:x2="110.46cm" svg:y2="116.914cm" draw:start-shape="id50" draw:start-glue-point="2" draw:end-shape="id97" draw:end-glue-point="0" svg:d="M90251 113606c0 828 5052 1655 10105 1655 5052 0 10104 827 10104 1653" svg:viewBox="0 0 20210 3309">
          <text:p/>
        </draw:connector>
        <draw:connector draw:style-name="gr1" draw:text-style-name="P1" draw:layer="layout" draw:type="curve" svg:x1="90.251cm" svg:y1="113.606cm" svg:x2="113.826cm" svg:y2="116.915cm" draw:start-shape="id50" draw:start-glue-point="2" draw:end-shape="id98" draw:end-glue-point="0" svg:d="M90251 113606c0 828 5894 1655 11788 1655 5893 0 11787 827 11787 1654" svg:viewBox="0 0 23576 3310">
          <text:p/>
        </draw:connector>
        <draw:connector draw:style-name="gr1" draw:text-style-name="P1" draw:layer="layout" draw:type="curve" svg:x1="90.251cm" svg:y1="113.606cm" svg:x2="93.744cm" svg:y2="116.911cm" draw:start-shape="id50" draw:start-glue-point="2" draw:end-shape="id99" draw:end-glue-point="0" svg:d="M90251 113606c0 827 873 1653 1747 1653 873 0 1746 826 1746 1652" svg:viewBox="0 0 3494 3306">
          <text:p/>
        </draw:connector>
        <draw:custom-shape draw:style-name="gr4" draw:text-style-name="P3" xml:id="id93" draw:id="id93" draw:layer="layout" svg:width="3.048cm" svg:height="2.54cm" svg:x="95.501cm" svg:y="116.911cm">
          <text:p text:style-name="P2"><text:span text:style-name="T1">Kedar</text:span></text:p>
          <text:p text:style-name="P2"><text:span text:style-name="T2">1Ch 1: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9" draw:id="id99" draw:layer="layout" svg:width="3.048cm" svg:height="2.54cm" svg:x="92.22cm" svg:y="116.911cm">
          <text:p text:style-name="P2"><text:span text:style-name="T14">Nebaioth</text:span></text:p>
          <text:p text:style-name="P2"><text:span text:style-name="T2">1Ch 1:29</text:span></text:p>
          <text:p text:style-name="P2"><text:span text:style-name="T1">Nebajoth</text:span></text:p>
          <text:p text:style-name="P2"><text:span text:style-name="T2">Gen 25: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4" draw:id="id94" draw:layer="layout" svg:width="3.048cm" svg:height="2.54cm" svg:x="98.68cm" svg:y="116.911cm">
          <text:p text:style-name="P2"><text:span text:style-name="T1">Adbeel</text:span></text:p>
          <text:p text:style-name="P2"><text:span text:style-name="T2">1Ch 1: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7" draw:id="id87" draw:layer="layout" svg:width="3.048cm" svg:height="2.54cm" svg:x="102.276cm" svg:y="116.912cm">
          <text:p text:style-name="P2"><text:span text:style-name="T1">Mibsam</text:span></text:p>
          <text:p text:style-name="P2"><text:span text:style-name="T2">1Ch 1: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6" draw:id="id96" draw:layer="layout" svg:width="3.048cm" svg:height="2.54cm" svg:x="105.614cm" svg:y="116.913cm">
          <text:p text:style-name="P2"><text:span text:style-name="T1">Mishma</text:span></text:p>
          <text:p text:style-name="P2"><text:span text:style-name="T2">1Ch 1: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7" draw:id="id97" draw:layer="layout" svg:width="3.048cm" svg:height="2.54cm" svg:x="108.936cm" svg:y="116.914cm">
          <text:p text:style-name="P2"><text:span text:style-name="T1">Dumah</text:span></text:p>
          <text:p text:style-name="P2"><text:span text:style-name="T2">1Ch 1: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8" draw:id="id98" draw:layer="layout" svg:width="3.048cm" svg:height="2.54cm" svg:x="112.302cm" svg:y="116.915cm">
          <text:p text:style-name="P2"><text:span text:style-name="T1">Massa</text:span></text:p>
          <text:p text:style-name="P2"><text:span text:style-name="T2">1Ch 1: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51" draw:id="id51" draw:layer="layout" svg:width="3.048cm" svg:height="2.54cm" svg:x="115.77cm" svg:y="116.913cm">
          <text:p text:style-name="P2"><text:span text:style-name="T1">Hadad</text:span></text:p>
          <text:p text:style-name="P4"><text:span text:style-name="T2">1Ch 1:30</text:span></text:p>
          <text:p text:style-name="P2"><text:span text:style-name="T1">Hadar</text:span></text:p>
          <text:p text:style-name="P2"><text:span text:style-name="T2">Gen 25: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52" draw:id="id52" draw:layer="layout" svg:width="3.048cm" svg:height="2.54cm" svg:x="119.171cm" svg:y="116.914cm">
          <text:p text:style-name="P2"><text:span text:style-name="T1">Tema</text:span></text:p>
          <text:p text:style-name="P2"><text:span text:style-name="T2">1Ch 1: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53" draw:id="id53" draw:layer="layout" svg:width="3.048cm" svg:height="2.54cm" svg:x="122.589cm" svg:y="116.915cm">
          <text:p text:style-name="P2"><text:span text:style-name="T1">Jetur</text:span></text:p>
          <text:p text:style-name="P2"><text:span text:style-name="T2">1Ch 1:31</text:span></text:p>
          <text:p text:style-name="P2"><text:span text:style-name="T2">1Ch 5: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1" draw:id="id101" draw:layer="layout" svg:width="3.048cm" svg:height="2.54cm" svg:x="126.042cm" svg:y="116.916cm">
          <text:p text:style-name="P2"><text:span text:style-name="T1">Naphish</text:span></text:p>
          <text:p text:style-name="P4"><text:span text:style-name="T2">1Ch 1:31</text:span></text:p>
          <text:p text:style-name="P2"><text:span text:style-name="T1">Nephish</text:span></text:p>
          <text:p text:style-name="P2"><text:span text:style-name="T2">1Ch 5: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2" draw:id="id102" draw:layer="layout" svg:width="3.048cm" svg:height="2.54cm" svg:x="132.46cm" svg:y="116.917cm">
          <text:p text:style-name="P2"><text:span text:style-name="T1">Kedemah</text:span></text:p>
          <text:p text:style-name="P2"><text:span text:style-name="T2">1Ch 1:3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 draw:text-style-name="P1" draw:layer="layout" draw:type="curve" svg:x1="68.98cm" svg:y1="113.651cm" svg:x2="51.392cm" svg:y2="116.88cm" draw:start-shape="id5" draw:start-glue-point="2" draw:end-shape="id100" draw:end-glue-point="0" svg:d="M68980 113651c0 808-4397 1615-8794 1615s-8794 807-8794 1614" svg:viewBox="0 0 17589 3230">
          <text:p/>
        </draw:connector>
        <draw:connector draw:style-name="gr1" draw:text-style-name="P1" draw:layer="layout" draw:type="curve" svg:x1="90.251cm" svg:y1="113.606cm" svg:x2="127.566cm" svg:y2="116.916cm" draw:start-shape="id50" draw:start-glue-point="2" draw:end-shape="id101" draw:end-glue-point="0" svg:d="M90251 113606c0 828 9329 1656 18658 1656 9328 0 18657 827 18657 1654" svg:viewBox="0 0 37316 3311">
          <text:p/>
        </draw:connector>
        <draw:connector draw:style-name="gr1" draw:text-style-name="P1" draw:layer="layout" draw:type="curve" svg:x1="90.251cm" svg:y1="113.606cm" svg:x2="133.984cm" svg:y2="116.917cm" draw:start-shape="id50" draw:start-glue-point="2" draw:end-shape="id102" draw:end-glue-point="0" svg:d="M90251 113606c0 828 10933 1656 21867 1656 10933 0 21866 828 21866 1655" svg:viewBox="0 0 43734 3312">
          <text:p/>
        </draw:connector>
        <draw:connector draw:style-name="gr29" draw:text-style-name="P1" xml:id="id1" draw:id="id1" draw:layer="layout" draw:type="curve" draw:line-skew="0.233cm" svg:x1="84.953cm" svg:y1="107.168cm" svg:x2="80.518cm" svg:y2="107.165cm" draw:start-shape="id91" draw:start-glue-point="3" draw:end-shape="id103" draw:end-glue-point="1" svg:d="M84953 107168c-2976 0-759-3-4435-3" svg:viewBox="0 0 4436 4">
          <text:p/>
        </draw:connector>
        <draw:custom-shape draw:style-name="gr30" draw:text-style-name="P12" xml:id="id103" draw:id="id103" draw:layer="layout" svg:width="3.048cm" svg:height="2.54cm" svg:x="77.47cm" svg:y="105.895cm">
          <text:p text:style-name="P2"><text:span text:style-name="T1">Keturah</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5" draw:id="id5" draw:layer="layout" svg:width="3.048cm" svg:height="2.54cm" svg:x="67.456cm" svg:y="111.111cm">
          <text:p text:style-name="P2"><text:span text:style-name="T1">Jokshan</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 draw:id="id4" draw:layer="layout" svg:width="3.048cm" svg:height="2.54cm" svg:x="64.057cm" svg:y="111.111cm">
          <text:p text:style-name="P2"><text:span text:style-name="T1">Zimran</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6" draw:id="id6" draw:layer="layout" svg:width="3.048cm" svg:height="2.54cm" svg:x="70.865cm" svg:y="111.111cm">
          <text:p text:style-name="P2"><text:span text:style-name="T1">Medan</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 draw:id="id7" draw:layer="layout" svg:width="3.048cm" svg:height="2.54cm" svg:x="74.198cm" svg:y="111.112cm">
          <text:p text:style-name="P2"><text:span text:style-name="T1">Midian</text:span></text:p>
          <text:p text:style-name="P2"><text:span text:style-name="T2">1Ch 1:32</text:span></text:p>
          <text:p text:style-name="P4"><text:span text:style-name="T1">Midianites</text:span></text:p>
          <text:p text:style-name="P4"><text:span text:style-name="T2">Num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 draw:id="id2" draw:layer="layout" svg:width="3.048cm" svg:height="2.54cm" svg:x="77.547cm" svg:y="111.113cm">
          <text:p text:style-name="P2"><text:span text:style-name="T1">Ishbak</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 draw:id="id3" draw:layer="layout" svg:width="3.048cm" svg:height="2.54cm" svg:x="80.9cm" svg:y="111.114cm">
          <text:p text:style-name="P2"><text:span text:style-name="T1">Shuah</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 draw:text-style-name="P1" draw:layer="layout" draw:type="curve" svg:x1="68.98cm" svg:y1="113.651cm" svg:x2="54.767cm" svg:y2="116.88cm" draw:start-shape="id5" draw:start-glue-point="2" draw:end-shape="id104" draw:end-glue-point="0" svg:d="M68980 113651c0 808-3553 1615-7107 1615-3553 0-7106 807-7106 1614" svg:viewBox="0 0 14214 3230">
          <text:p/>
        </draw:connector>
        <draw:connector draw:style-name="gr7" draw:text-style-name="P1" draw:layer="layout" draw:type="curve" svg:x1="75.722cm" svg:y1="113.652cm" svg:x2="58.517cm" svg:y2="116.914cm" draw:start-shape="id7" draw:start-glue-point="2" draw:end-shape="id105" draw:end-glue-point="0" svg:d="M75722 113652c0 816-4301 1632-8603 1632-4301 0-8602 815-8602 1630" svg:viewBox="0 0 17206 3263">
          <text:p/>
        </draw:connector>
        <draw:connector draw:style-name="gr7" draw:text-style-name="P1" draw:layer="layout" draw:type="curve" svg:x1="75.722cm" svg:y1="113.652cm" svg:x2="61.722cm" svg:y2="116.914cm" draw:start-shape="id7" draw:start-glue-point="2" draw:end-shape="id106" draw:end-glue-point="0" svg:d="M75722 113652c0 816-3500 1632-7000 1632s-7000 815-7000 1630" svg:viewBox="0 0 14001 3263">
          <text:p/>
        </draw:connector>
        <draw:connector draw:style-name="gr7" draw:text-style-name="P1" draw:layer="layout" draw:type="curve" svg:x1="75.722cm" svg:y1="113.652cm" svg:x2="64.899cm" svg:y2="116.914cm" draw:start-shape="id7" draw:start-glue-point="2" draw:end-shape="id107" draw:end-glue-point="0" svg:d="M75722 113652c0 2448-10823 817-10823 3262" svg:viewBox="0 0 10824 3263">
          <text:p/>
        </draw:connector>
        <draw:connector draw:style-name="gr7" draw:text-style-name="P1" draw:layer="layout" draw:type="curve" svg:x1="75.722cm" svg:y1="113.652cm" svg:x2="68.356cm" svg:y2="116.915cm" draw:start-shape="id7" draw:start-glue-point="2" draw:end-shape="id108" draw:end-glue-point="0" svg:d="M75722 113652c0 816-1842 1632-3683 1632-1842 0-3683 816-3683 1631" svg:viewBox="0 0 7367 3264">
          <text:p/>
        </draw:connector>
        <draw:connector draw:style-name="gr7" draw:text-style-name="P1" draw:layer="layout" draw:type="curve" svg:x1="75.722cm" svg:y1="113.652cm" svg:x2="71.509cm" svg:y2="116.916cm" draw:start-shape="id7" draw:start-glue-point="2" draw:end-shape="id109" draw:end-glue-point="0" svg:d="M75722 113652c0 817-1053 1633-2107 1633-1053 0-2106 816-2106 1631" svg:viewBox="0 0 4214 3265">
          <text:p/>
        </draw:connector>
        <draw:custom-shape draw:style-name="gr4" draw:text-style-name="P3" xml:id="id104" draw:id="id104" draw:layer="layout" svg:width="3.048cm" svg:height="2.54cm" svg:x="53.243cm" svg:y="116.88cm">
          <text:p text:style-name="P2"><text:span text:style-name="T1">Dedan</text:span></text:p>
          <text:p text:style-name="P2"><text:span text:style-name="T2">1Ch 1:32</text:span></text:p>
          <text:p text:style-name="P4"><text:span text:style-name="T2">Gen 2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0" draw:id="id100" draw:layer="layout" svg:width="3.048cm" svg:height="2.54cm" svg:x="49.868cm" svg:y="116.88cm">
          <text:p text:style-name="P2"><text:span text:style-name="T1">Sheba</text:span></text:p>
          <text:p text:style-name="P2"><text:span text:style-name="T2">1Ch 1:32</text:span></text:p>
          <text:p text:style-name="P2"><text:span text:style-name="T2">Gen 2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6" draw:id="id106" draw:layer="layout" svg:width="3.048cm" svg:height="2.54cm" svg:x="60.198cm" svg:y="116.914cm">
          <text:p text:style-name="P2"><text:span text:style-name="T1">Epher</text:span></text:p>
          <text:p text:style-name="P2"><text:span text:style-name="T2">1Ch 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5" draw:id="id105" draw:layer="layout" svg:width="3.048cm" svg:height="2.54cm" svg:x="56.993cm" svg:y="116.914cm">
          <text:p text:style-name="P2"><text:span text:style-name="T1">Ephah</text:span></text:p>
          <text:p text:style-name="P2"><text:span text:style-name="T2">1Ch 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7" draw:id="id107" draw:layer="layout" svg:width="3.048cm" svg:height="2.54cm" svg:x="63.375cm" svg:y="116.914cm">
          <text:p text:style-name="P2"><text:span text:style-name="T1">Henoch</text:span></text:p>
          <text:p text:style-name="P2"><text:span text:style-name="T2">1Ch 1:33</text:span></text:p>
          <text:p text:style-name="P2"><text:span text:style-name="T1">Hanoch</text:span></text:p>
          <text:p text:style-name="P2"><text:span text:style-name="T2">Gen 25: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8" draw:id="id108" draw:layer="layout" svg:width="3.048cm" svg:height="2.54cm" svg:x="66.832cm" svg:y="116.915cm">
          <text:p text:style-name="P2"><text:span text:style-name="T1">Abida</text:span></text:p>
          <text:p text:style-name="P2"><text:span text:style-name="T2">1Ch 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9" draw:id="id109" draw:layer="layout" svg:width="3.048cm" svg:height="2.54cm" svg:x="69.985cm" svg:y="116.916cm">
          <text:p text:style-name="P2"><text:span text:style-name="T1">Eldaah</text:span></text:p>
          <text:p text:style-name="P2"><text:span text:style-name="T2">1Ch 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17" draw:id="id117" draw:layer="layout" svg:width="3.048cm" svg:height="2.54cm" svg:x="84.972cm" svg:y="116.901cm">
          <text:p text:style-name="P2"><text:span text:style-name="T1">Esau</text:span></text:p>
          <text:p text:style-name="P2"><text:span text:style-name="T2">1Ch 1:34</text:span></text:p>
          <text:p text:style-name="P2"><text:span text:style-name="T2">Gen 25:21-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7" draw:id="id177" draw:layer="layout" svg:width="3.048cm" svg:height="2.54cm" svg:x="74.058cm" svg:y="116.902cm">
          <text:p text:style-name="P2"><text:span text:style-name="T1">Israel</text:span></text:p>
          <text:p text:style-name="P2"><text:span text:style-name="T2">1Ch 1:34</text:span></text:p>
          <text:p text:style-name="P2"><text:span text:style-name="T7">Jacob</text:span></text:p>
          <text:p text:style-name="P2"><text:span text:style-name="T2">Gen 32:2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svg:x1="90.264cm" svg:y1="124.624cm" svg:x2="93.945cm" svg:y2="128.133cm" draw:start-shape="id110" draw:start-glue-point="2" draw:end-shape="id111" draw:end-glue-point="0" svg:d="M90264 124624c0 2632 3681 878 3681 3509" svg:viewBox="0 0 3682 3510">
          <text:p/>
        </draw:connector>
        <draw:connector draw:style-name="gr7" draw:text-style-name="P1" draw:layer="layout" draw:type="curve" svg:x1="90.264cm" svg:y1="124.624cm" svg:x2="90.321cm" svg:y2="128.132cm" draw:start-shape="id110" draw:start-glue-point="2" draw:end-shape="id112" draw:end-glue-point="0" svg:d="M90264 124624c0 2632 57 879 57 3508" svg:viewBox="0 0 58 3509">
          <text:p/>
        </draw:connector>
        <draw:connector draw:style-name="gr7" draw:text-style-name="P1" draw:layer="layout" draw:type="curve" svg:x1="79.263cm" svg:y1="124.624cm" svg:x2="75.574cm" svg:y2="128.14cm" draw:start-shape="id113" draw:start-glue-point="2" draw:end-shape="id114" draw:end-glue-point="0" svg:d="M79263 124624c0 2638-3689 881-3689 3516" svg:viewBox="0 0 3690 3517">
          <text:p/>
        </draw:connector>
        <draw:connector draw:style-name="gr1" draw:text-style-name="P1" draw:layer="layout" draw:type="curve" svg:x1="31.325cm" svg:y1="125.634cm" svg:x2="53.47cm" svg:y2="128.118cm" draw:start-shape="id115" draw:start-glue-point="2" draw:end-shape="id116" draw:end-glue-point="0" svg:d="M31325 125634c0 622 5536 1243 11073 1243 5536 0 11072 621 11072 1241" svg:viewBox="0 0 22146 2485">
          <text:p/>
        </draw:connector>
        <draw:connector draw:style-name="gr1" draw:text-style-name="P1" draw:layer="layout" draw:type="curve" svg:x1="86.492cm" svg:y1="113.606cm" svg:x2="86.496cm" svg:y2="116.901cm" draw:start-shape="id95" draw:start-glue-point="2" draw:end-shape="id117" draw:end-glue-point="0" svg:d="M86492 113606c0 2472 4 825 4 3295" svg:viewBox="0 0 5 3296">
          <text:p/>
        </draw:connector>
        <draw:connector draw:style-name="gr7" draw:text-style-name="P1" draw:layer="layout" draw:type="curve" svg:x1="79.263cm" svg:y1="124.624cm" svg:x2="71.927cm" svg:y2="128.141cm" draw:start-shape="id113" draw:start-glue-point="2" draw:end-shape="id118" draw:end-glue-point="0" svg:d="M79263 124624c0 2638-7336 880-7336 3517" svg:viewBox="0 0 7337 3518">
          <text:p/>
        </draw:connector>
        <draw:custom-shape draw:style-name="gr4" draw:text-style-name="P3" xml:id="id110" draw:id="id110" draw:layer="layout" svg:width="3.048cm" svg:height="2.54cm" svg:x="88.74cm" svg:y="122.084cm">
          <text:p text:style-name="P2"><text:span text:style-name="T1">Reuel</text:span></text:p>
          <text:p text:style-name="P2"><text:span text:style-name="T2">1Ch 1:35</text:span></text:p>
          <text:p text:style-name="P2"><text:span text:style-name="T2">Gen 36: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13" draw:id="id113" draw:layer="layout" svg:width="3.048cm" svg:height="2.54cm" svg:x="77.739cm" svg:y="122.084cm">
          <text:p text:style-name="P2"><text:span text:style-name="T14">Eliphaz</text:span></text:p>
          <text:p text:style-name="P2"><text:span text:style-name="T2">1Ch 1:35</text:span></text:p>
          <text:p text:style-name="P2"><text:span text:style-name="T2">Gen 36:4,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 draw:text-style-name="P3" xml:id="id125" draw:id="id125" draw:layer="layout" svg:width="3.2cm" svg:height="2.591cm" svg:x="44.368cm" svg:y="128.116cm">
          <text:p text:style-name="P2"><text:span text:style-name="T1">Jeush</text:span></text:p>
          <text:p text:style-name="P2"><text:span text:style-name="T2">1Ch 1:35</text:span></text:p>
          <text:p text:style-name="P2"><text:span text:style-name="T2">Gen 36:5</text:span></text:p>
          <text:p text:style-name="P2"><text:span text:style-name="T7">Duke Jeush</text:span></text:p>
          <text:p text:style-name="P2"><text:span text:style-name="T2">Gen 36: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 draw:text-style-name="P3" xml:id="id126" draw:id="id126" draw:layer="layout" svg:width="3.505cm" svg:height="2.642cm" svg:x="47.969cm" svg:y="128.117cm">
          <text:p text:style-name="P2"><text:span text:style-name="T1">Jaalam</text:span></text:p>
          <text:p text:style-name="P2"><text:span text:style-name="T2">1Ch 1:35</text:span></text:p>
          <text:p text:style-name="P4"><text:span text:style-name="T2">Gen 36:5</text:span></text:p>
          <text:p text:style-name="P4"><text:span text:style-name="T7">Duke Jaalam</text:span></text:p>
          <text:p text:style-name="P4"><text:span text:style-name="T2">Gen 36: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3" xml:id="id116" draw:id="id116" draw:layer="layout" svg:width="3.2cm" svg:height="2.642cm" svg:x="51.87cm" svg:y="128.118cm">
          <text:p text:style-name="P2"><text:span text:style-name="T1">Korah</text:span></text:p>
          <text:p text:style-name="P2"><text:span text:style-name="T2">1Ch 1:35</text:span></text:p>
          <text:p text:style-name="P4"><text:span text:style-name="T2">Gen 36:5</text:span></text:p>
          <text:p text:style-name="P4"><text:span text:style-name="T7">Duke Korah</text:span></text:p>
          <text:p text:style-name="P4"><text:span text:style-name="T2">Gen 36: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svg:x1="79.263cm" svg:y1="124.624cm" svg:x2="64.874cm" svg:y2="128.139cm" draw:start-shape="id113" draw:start-glue-point="2" draw:end-shape="id119" draw:end-glue-point="0" svg:d="M79263 124624c0 2637-14389 880-14389 3515" svg:viewBox="0 0 14390 3516">
          <text:p/>
        </draw:connector>
        <draw:connector draw:style-name="gr7" draw:text-style-name="P1" draw:layer="layout" draw:type="curve" svg:x1="79.263cm" svg:y1="124.624cm" svg:x2="61.447cm" svg:y2="128.139cm" draw:start-shape="id113" draw:start-glue-point="2" draw:end-shape="id120" draw:end-glue-point="0" svg:d="M79263 124624c0 2637-17816 880-17816 3515" svg:viewBox="0 0 17817 3516">
          <text:p/>
        </draw:connector>
        <draw:connector draw:style-name="gr7" draw:text-style-name="P1" draw:layer="layout" draw:type="curve" svg:x1="79.263cm" svg:y1="124.624cm" svg:x2="57.992cm" svg:y2="128.139cm" draw:start-shape="id113" draw:start-glue-point="2" draw:end-shape="id121" draw:end-glue-point="0" svg:d="M79263 124624c0 2637-21271 880-21271 3515" svg:viewBox="0 0 21272 3516">
          <text:p/>
        </draw:connector>
        <draw:connector draw:style-name="gr7" draw:text-style-name="P1" draw:layer="layout" draw:type="curve" svg:x1="79.263cm" svg:y1="124.624cm" svg:x2="68.398cm" svg:y2="128.14cm" draw:start-shape="id113" draw:start-glue-point="2" draw:end-shape="id122" draw:end-glue-point="0" svg:d="M79263 124624c0 2638-10865 881-10865 3516" svg:viewBox="0 0 10866 3517">
          <text:p/>
        </draw:connector>
        <draw:connector draw:style-name="gr1" draw:text-style-name="P1" draw:layer="layout" draw:type="curve" svg:x1="79.266cm" svg:y1="119.449cm" svg:x2="79.263cm" svg:y2="122.084cm" draw:start-shape="id123" draw:start-glue-point="2" draw:end-shape="id113" draw:end-glue-point="0" svg:d="M79266 119449c0 1977-3 660-3 2635" svg:viewBox="0 0 4 2636">
          <text:p/>
        </draw:connector>
        <draw:connector draw:style-name="gr1" draw:text-style-name="P1" draw:layer="layout" draw:type="curve" svg:x1="90.265cm" svg:y1="119.44cm" svg:x2="90.264cm" svg:y2="122.084cm" draw:start-shape="id124" draw:end-shape="id110" draw:end-glue-point="0" svg:d="M90265 119440c0 1984-1 663-1 2644" svg:viewBox="0 0 2 2645">
          <text:p/>
        </draw:connector>
        <draw:connector draw:style-name="gr1" draw:text-style-name="P1" draw:layer="layout" draw:type="curve" svg:x1="31.325cm" svg:y1="125.634cm" svg:x2="45.968cm" svg:y2="128.116cm" draw:start-shape="id115" draw:start-glue-point="2" draw:end-shape="id125" draw:end-glue-point="0" svg:d="M31325 125634c0 621 3661 1241 7322 1241 3660 0 7321 621 7321 1241" svg:viewBox="0 0 14644 2483">
          <text:p/>
        </draw:connector>
        <draw:connector draw:style-name="gr1" draw:text-style-name="P1" draw:layer="layout" draw:type="curve" svg:x1="31.325cm" svg:y1="125.634cm" svg:x2="49.721cm" svg:y2="128.117cm" draw:start-shape="id115" draw:start-glue-point="2" draw:end-shape="id126" draw:end-glue-point="0" svg:d="M31325 125634c0 621 4599 1242 9198 1242s9198 621 9198 1241" svg:viewBox="0 0 18397 2484">
          <text:p/>
        </draw:connector>
        <draw:connector draw:style-name="gr7" draw:text-style-name="P1" draw:layer="layout" draw:type="curve" svg:x1="90.264cm" svg:y1="124.624cm" svg:x2="97.891cm" svg:y2="128.132cm" draw:start-shape="id110" draw:start-glue-point="2" draw:end-shape="id127" draw:end-glue-point="0" svg:d="M90264 124624c0 2632 7627 879 7627 3508" svg:viewBox="0 0 7628 3509">
          <text:p/>
        </draw:connector>
        <draw:connector draw:style-name="gr7" draw:text-style-name="P1" draw:layer="layout" draw:type="curve" svg:x1="90.264cm" svg:y1="124.624cm" svg:x2="102.087cm" svg:y2="128.133cm" draw:start-shape="id110" draw:start-glue-point="2" draw:end-shape="id128" draw:end-glue-point="0" svg:d="M90264 124624c0 2632 11823 878 11823 3509" svg:viewBox="0 0 11824 3510">
          <text:p/>
        </draw:connector>
        <draw:custom-shape draw:style-name="gr34" draw:text-style-name="P3" xml:id="id120" draw:id="id120" draw:layer="layout" svg:width="3.099cm" svg:height="2.54cm" svg:x="59.898cm" svg:y="128.139cm">
          <text:p text:style-name="P2"><text:span text:style-name="T1">Omar</text:span></text:p>
          <text:p text:style-name="P2"><text:span text:style-name="T2">1Ch 1:36</text:span></text:p>
          <text:p text:style-name="P2"><text:span text:style-name="T7">Duke Omar</text:span></text:p>
          <text:p text:style-name="P2"><text:span text:style-name="T2">Gen 3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 draw:text-style-name="P13" xml:id="id121" draw:id="id121" draw:layer="layout" svg:width="3.302cm" svg:height="2.54cm" svg:x="56.341cm" svg:y="128.139cm">
          <text:p text:style-name="P2"><text:span text:style-name="T1">Teman</text:span></text:p>
          <text:p text:style-name="P2"><text:span text:style-name="T2">1Ch 1:36</text:span></text:p>
          <text:p text:style-name="P2"><text:span text:style-name="T7">Duke Teman</text:span></text:p>
          <text:p text:style-name="P2"><text:span text:style-name="T2">Gen 3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6" draw:text-style-name="P3" xml:id="id119" draw:id="id119" draw:layer="layout" svg:width="3.251cm" svg:height="3.15cm" svg:x="63.249cm" svg:y="128.139cm">
          <text:p text:style-name="P2"><text:span text:style-name="T1">Zephi</text:span></text:p>
          <text:p text:style-name="P2"><text:span text:style-name="T2">1Ch 1:36</text:span></text:p>
          <text:p text:style-name="P2"><text:span text:style-name="T7">Zepho</text:span></text:p>
          <text:p text:style-name="P2"><text:span text:style-name="T2">Gen 36:11</text:span></text:p>
          <text:p text:style-name="P2"><text:span text:style-name="T7">Duke Zepho</text:span></text:p>
          <text:p text:style-name="P2"><text:span text:style-name="T2">Gen 3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7" draw:text-style-name="P3" xml:id="id122" draw:id="id122" draw:layer="layout" svg:width="3.353cm" svg:height="2.54cm" svg:x="66.722cm" svg:y="128.14cm">
          <text:p text:style-name="P2"><text:span text:style-name="T1">Gatam</text:span></text:p>
          <text:p text:style-name="P2"><text:span text:style-name="T2">1Ch 1:36</text:span></text:p>
          <text:p text:style-name="P2"><text:span text:style-name="T7">Duke Gatam</text:span></text:p>
          <text:p text:style-name="P2"><text:span text:style-name="T2">Gen 36: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 draw:text-style-name="P13" xml:id="id118" draw:id="id118" draw:layer="layout" svg:width="3.2cm" svg:height="2.54cm" svg:x="70.327cm" svg:y="128.141cm">
          <text:p text:style-name="P2"><text:span text:style-name="T1">Kenaz</text:span></text:p>
          <text:p text:style-name="P2"><text:span text:style-name="T2">1Ch 1:36</text:span></text:p>
          <text:p text:style-name="P2"><text:span text:style-name="T7">Duke Kenaz</text:span></text:p>
          <text:p text:style-name="P2"><text:span text:style-name="T2">Gen 3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 draw:text-style-name="P13" xml:id="id114" draw:id="id114" draw:layer="layout" svg:width="3.556cm" svg:height="2.642cm" svg:x="73.796cm" svg:y="128.14cm">
          <text:p text:style-name="P2"><text:span text:style-name="T1">Timna</text:span></text:p>
          <text:p text:style-name="P2"><text:span text:style-name="T2">1Ch 1:36</text:span></text:p>
          <text:p text:style-name="P2"><text:span text:style-name="T7">Duke Timnah</text:span></text:p>
          <text:p text:style-name="P2"><text:span text:style-name="T2">Gen 36:40</text:span></text:p>
          <text:p text:style-name="P2"><text:span text:style-name="T2">1Ch 1: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0" draw:text-style-name="P3" xml:id="id11" draw:id="id11" draw:layer="layout" svg:width="3.556cm" svg:height="2.54cm" svg:x="81.478cm" svg:y="128.141cm">
          <text:p text:style-name="P2"><text:span text:style-name="T1">Amalek</text:span></text:p>
          <text:p text:style-name="P2"><text:span text:style-name="T2">1Ch 1:36</text:span></text:p>
          <text:p text:style-name="P2"><text:span text:style-name="T7">Duke Amalek</text:span></text:p>
          <text:p text:style-name="P2"><text:span text:style-name="T2">Gen 36: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3" xml:id="id112" draw:id="id112" draw:layer="layout" svg:width="3.505cm" svg:height="2.54cm" svg:x="88.569cm" svg:y="128.132cm">
          <text:p text:style-name="P2"><text:span text:style-name="T1">Nahath</text:span></text:p>
          <text:p text:style-name="P2"><text:span text:style-name="T2">1Ch 1:37</text:span></text:p>
          <text:p text:style-name="P2"><text:span text:style-name="T7">Duke Nahath</text:span></text:p>
          <text:p text:style-name="P2"><text:span text:style-name="T2">Gen 36: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3" xml:id="id111" draw:id="id111" draw:layer="layout" svg:width="3.15cm" svg:height="2.54cm" svg:x="92.37cm" svg:y="128.133cm">
          <text:p text:style-name="P2"><text:span text:style-name="T1">Zerah</text:span></text:p>
          <text:p text:style-name="P2"><text:span text:style-name="T2">1Ch 1:37</text:span></text:p>
          <text:p text:style-name="P2"><text:span text:style-name="T7">Duke Zerah</text:span></text:p>
          <text:p text:style-name="P2"><text:span text:style-name="T2">Gen 36: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 draw:text-style-name="P3" xml:id="id127" draw:id="id127" draw:layer="layout" svg:width="4.064cm" svg:height="2.54cm" svg:x="95.859cm" svg:y="128.132cm">
          <text:p text:style-name="P2"><text:span text:style-name="T1">Shammah</text:span></text:p>
          <text:p text:style-name="P2"><text:span text:style-name="T2">1Ch 1:37</text:span></text:p>
          <text:p text:style-name="P2"><text:span text:style-name="T7">Duke Shammah</text:span></text:p>
          <text:p text:style-name="P2"><text:span text:style-name="T2">Gen 36: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 draw:text-style-name="P3" xml:id="id128" draw:id="id128" draw:layer="layout" svg:width="3.454cm" svg:height="2.54cm" svg:x="100.36cm" svg:y="128.133cm">
          <text:p text:style-name="P2"><text:span text:style-name="T1">Mizzah</text:span></text:p>
          <text:p text:style-name="P2"><text:span text:style-name="T2">1Ch 1:37</text:span></text:p>
          <text:p text:style-name="P2"><text:span text:style-name="T7">Duke Mizzah</text:span></text:p>
          <text:p text:style-name="P2"><text:span text:style-name="T2">Gen 36: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3" draw:text-style-name="P1" draw:layer="layout" draw:type="curve" svg:x1="140.093cm" svg:y1="60.809cm" svg:x2="144.294cm" svg:y2="62.171cm" draw:start-shape="id129" draw:start-glue-point="2" draw:end-shape="id130" draw:end-glue-point="0" svg:d="M140093 60809c0 341 1050 682 2101 682 1050 0 2100 340 2100 680" svg:viewBox="0 0 4202 1363">
          <text:p/>
        </draw:connector>
        <draw:connector draw:style-name="gr44" draw:text-style-name="P1" draw:layer="layout" draw:type="curve" svg:x1="144.283cm" svg:y1="56.569cm" svg:x2="144.293cm" svg:y2="58.27cm" draw:start-shape="id131" draw:start-glue-point="2" draw:end-shape="id132" draw:end-glue-point="0" svg:d="M144283 56569c0 426 3 851 5 851 3 0 5 425 5 850" svg:viewBox="0 0 11 1702">
          <text:p/>
        </draw:connector>
        <draw:custom-shape draw:style-name="gr4" draw:text-style-name="P3" xml:id="id132" draw:id="id132" draw:layer="layout" svg:width="3.048cm" svg:height="2.54cm" svg:x="142.769cm" svg:y="58.27cm">
          <text:p text:style-name="P2"><text:span text:style-name="T1">Bela</text:span></text:p>
          <text:p text:style-name="P2"><text:span text:style-name="T2">1Ch 1:4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 draw:text-style-name="P14" xml:id="id131" draw:id="id131" draw:layer="layout" svg:width="3.048cm" svg:height="2.54cm" svg:x="142.759cm" svg:y="54.029cm">
          <text:p text:style-name="P8"><text:span text:style-name="T9">Beor</text:span></text:p>
          <text:p text:style-name="P8"><text:span text:style-name="T10">1Ch 1:4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30" draw:id="id130" draw:layer="layout" svg:width="3.048cm" svg:height="2.54cm" svg:x="142.77cm" svg:y="62.171cm">
          <text:p text:style-name="P2"><text:span text:style-name="T1">Jobab</text:span></text:p>
          <text:p text:style-name="P2"><text:span text:style-name="T2">1Ch 1:4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 draw:text-style-name="P14" xml:id="id129" draw:id="id129" draw:layer="layout" svg:width="3.048cm" svg:height="2.54cm" svg:x="138.569cm" svg:y="58.269cm">
          <text:p text:style-name="P8"><text:span text:style-name="T9">Zerah</text:span></text:p>
          <text:p text:style-name="P8"><text:span text:style-name="T10">1Ch 1:4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7" draw:text-style-name="P1" draw:layer="layout" draw:type="curve" svg:x1="144.293cm" svg:y1="60.81cm" svg:x2="144.294cm" svg:y2="62.171cm" draw:start-shape="id132" draw:start-glue-point="2" draw:end-shape="id130" draw:end-glue-point="0" svg:d="M144293 60810c0 1021 1 341 1 1361" svg:viewBox="0 0 2 1362">
          <text:p/>
        </draw:connector>
        <draw:custom-shape draw:style-name="gr4" draw:text-style-name="P3" xml:id="id133" draw:id="id133" draw:layer="layout" svg:width="3.048cm" svg:height="2.54cm" svg:x="142.771cm" svg:y="66.672cm">
          <text:p text:style-name="P2"><text:span text:style-name="T1">Husham</text:span></text:p>
          <text:p text:style-name="P2"><text:span text:style-name="T2">1Ch 1:4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7" draw:text-style-name="P1" draw:layer="layout" draw:type="curve" svg:x1="144.294cm" svg:y1="64.711cm" svg:x2="144.295cm" svg:y2="66.672cm" draw:start-shape="id130" draw:start-glue-point="2" draw:end-shape="id133" draw:end-glue-point="0" svg:d="M144294 64711c0 491 0 981 1 981 0 0 0 490 0 980" svg:viewBox="0 0 2 1962">
          <text:p/>
        </draw:connector>
        <draw:connector draw:style-name="gr43" draw:text-style-name="P1" draw:layer="layout" draw:type="curve" svg:x1="140.105cm" svg:y1="69.21cm" svg:x2="144.295cm" svg:y2="71.472cm" draw:start-shape="id134" draw:start-glue-point="2" svg:d="M140105 69210c0 691 1048 1382 2095 1382 1048 0 2095 440 2095 880" svg:viewBox="0 0 4191 2263">
          <text:p/>
        </draw:connector>
        <draw:custom-shape draw:style-name="gr4" draw:text-style-name="P3" xml:id="id135" draw:id="id135" draw:layer="layout" svg:width="3.048cm" svg:height="2.54cm" svg:x="142.771cm" svg:y="71.072cm">
          <text:p text:style-name="P2"><text:span text:style-name="T1">Hadad</text:span></text:p>
          <text:p text:style-name="P2"><text:span text:style-name="T2">1Ch 1: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 draw:text-style-name="P14" xml:id="id134" draw:id="id134" draw:layer="layout" svg:width="3.048cm" svg:height="2.54cm" svg:x="138.581cm" svg:y="66.67cm">
          <text:p text:style-name="P8"><text:span text:style-name="T9">Bedad</text:span></text:p>
          <text:p text:style-name="P8"><text:span text:style-name="T10">1Ch 1: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7" draw:text-style-name="P1" draw:layer="layout" draw:type="curve" svg:x1="144.295cm" svg:y1="69.212cm" svg:x2="144.295cm" svg:y2="71.072cm" draw:start-shape="id133" draw:start-glue-point="2" draw:end-shape="id135" draw:end-glue-point="0" svg:d="M144295 69212v1860" svg:viewBox="0 0 1 1861">
          <text:p/>
        </draw:connector>
        <draw:custom-shape draw:style-name="gr4" draw:text-style-name="P3" xml:id="id136" draw:id="id136" draw:layer="layout" svg:width="3.048cm" svg:height="2.54cm" svg:x="142.772cm" svg:y="75.773cm">
          <text:p text:style-name="P2"><text:span text:style-name="T1">Samlah</text:span></text:p>
          <text:p text:style-name="P2"><text:span text:style-name="T2">1Ch 1:4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7" draw:text-style-name="P1" draw:layer="layout" draw:type="curve" svg:x1="144.295cm" svg:y1="73.612cm" svg:x2="144.296cm" svg:y2="75.773cm" draw:start-shape="id135" draw:start-glue-point="2" draw:end-shape="id136" draw:end-glue-point="0" svg:d="M144295 73612c0 541 0 1081 1 1081 0 0 0 540 0 1080" svg:viewBox="0 0 2 2162">
          <text:p/>
        </draw:connector>
        <draw:custom-shape draw:style-name="gr4" draw:text-style-name="P3" xml:id="id137" draw:id="id137" draw:layer="layout" svg:width="3.048cm" svg:height="2.54cm" svg:x="142.773cm" svg:y="79.774cm">
          <text:p text:style-name="P2"><text:span text:style-name="T1">Shaul</text:span></text:p>
          <text:p text:style-name="P2"><text:span text:style-name="T2">1Ch 1:48</text:span></text:p>
          <text:p text:style-name="P2"><text:span text:style-name="T7">Saul</text:span></text:p>
          <text:p text:style-name="P2"><text:span text:style-name="T2">Gen 36:3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7" draw:text-style-name="P1" draw:layer="layout" draw:type="curve" svg:x1="144.296cm" svg:y1="78.313cm" svg:x2="144.297cm" svg:y2="79.774cm" draw:start-shape="id136" draw:start-glue-point="2" draw:end-shape="id137" draw:end-glue-point="0" svg:d="M144296 78313c0 366 0 731 1 731 0 0 0 365 0 730" svg:viewBox="0 0 2 1462">
          <text:p/>
        </draw:connector>
        <draw:connector draw:style-name="gr43" draw:text-style-name="P1" draw:layer="layout" draw:type="curve" svg:x1="140.219cm" svg:y1="82.306cm" svg:x2="144.296cm" svg:y2="83.973cm" draw:start-shape="id138" draw:start-glue-point="2" draw:end-shape="id139" draw:end-glue-point="0" svg:d="M140219 82306c0 417 1019 834 2039 834 1019 0 2038 417 2038 833" svg:viewBox="0 0 4078 1668">
          <text:p/>
        </draw:connector>
        <draw:custom-shape draw:style-name="gr5" draw:text-style-name="P3" xml:id="id139" draw:id="id139" draw:layer="layout" svg:width="3.15cm" svg:height="2.54cm" svg:x="142.721cm" svg:y="83.973cm">
          <text:p text:style-name="P2"><text:span text:style-name="T1">Baal-hanan</text:span></text:p>
          <text:p text:style-name="P2"><text:span text:style-name="T2">1Ch 1:4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4" xml:id="id138" draw:id="id138" draw:layer="layout" svg:width="3.048cm" svg:height="2.54cm" svg:x="138.695cm" svg:y="79.766cm">
          <text:p text:style-name="P8"><text:span text:style-name="T9">Achbor</text:span></text:p>
          <text:p text:style-name="P8"><text:span text:style-name="T10">1Ch 1:4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7" draw:text-style-name="P1" draw:layer="layout" draw:type="curve" svg:x1="144.297cm" svg:y1="82.314cm" svg:x2="144.296cm" svg:y2="83.973cm" draw:start-shape="id137" draw:start-glue-point="2" draw:end-shape="id139" draw:end-glue-point="0" svg:d="M144297 82314c0 1245-1 416-1 1659" svg:viewBox="0 0 2 1660">
          <text:p/>
        </draw:connector>
        <draw:custom-shape draw:style-name="gr4" draw:text-style-name="P3" xml:id="id140" draw:id="id140" draw:layer="layout" svg:width="3.048cm" svg:height="2.54cm" svg:x="142.775cm" svg:y="87.474cm">
          <text:p text:style-name="P2"><text:span text:style-name="T1">Hadad</text:span></text:p>
          <text:p text:style-name="P2"><text:span text:style-name="T2">1Ch 1:49</text:span></text:p>
          <text:p text:style-name="P2"><text:span text:style-name="T7">Hadar</text:span></text:p>
          <text:p text:style-name="P2"><text:span text:style-name="T2">Gen 36:3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12" xml:id="id141" draw:id="id141" draw:layer="layout" svg:width="3.048cm" svg:height="2.54cm" svg:x="147.258cm" svg:y="87.477cm">
          <text:p text:style-name="P2"><text:span text:style-name="T1">Mehetabel</text:span></text:p>
          <text:p text:style-name="P2"><text:span text:style-name="T2">1Ch 1: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0" draw:text-style-name="P1" draw:layer="layout" draw:type="curve" svg:x1="145.823cm" svg:y1="88.744cm" svg:x2="147.258cm" svg:y2="88.747cm" draw:start-shape="id140" draw:start-glue-point="1" draw:end-shape="id141" draw:end-glue-point="3" svg:d="M145823 88744c1077 0 360 3 1435 3" svg:viewBox="0 0 1436 4">
          <text:p/>
        </draw:connector>
        <draw:custom-shape draw:style-name="gr51" draw:text-style-name="P15" xml:id="id142" draw:id="id142" draw:layer="layout" svg:width="3.048cm" svg:height="2.54cm" svg:x="147.258cm" svg:y="84.45cm">
          <text:p text:style-name="P2"><text:span text:style-name="T1">Matred</text:span></text:p>
          <text:p text:style-name="P2"><text:span text:style-name="T2">1Ch 1: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5" xml:id="id143" draw:id="id143" draw:layer="layout" svg:width="3.048cm" svg:height="2.54cm" svg:x="147.263cm" svg:y="81.402cm">
          <text:p text:style-name="P2"><text:span text:style-name="T1">Mezahab</text:span></text:p>
          <text:p text:style-name="P2"><text:span text:style-name="T2">1Ch 1: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4" draw:text-style-name="P1" draw:layer="layout" draw:type="curve" svg:x1="148.782cm" svg:y1="86.99cm" svg:x2="148.782cm" svg:y2="87.477cm" draw:start-shape="id142" draw:start-glue-point="2" draw:end-shape="id141" draw:end-glue-point="0" svg:d="M148782 86990v487" svg:viewBox="0 0 1 488">
          <text:p/>
        </draw:connector>
        <draw:connector draw:style-name="gr44" draw:text-style-name="P1" draw:layer="layout" draw:type="curve" svg:x1="148.787cm" svg:y1="83.942cm" svg:x2="148.782cm" svg:y2="84.45cm" draw:start-shape="id143" draw:start-glue-point="2" draw:end-shape="id142" draw:end-glue-point="0" svg:d="M148787 83942c0 128-1 255-3 255-1 0-2 127-2 253" svg:viewBox="0 0 6 509">
          <text:p/>
        </draw:connector>
        <draw:connector draw:style-name="gr47" draw:text-style-name="P1" draw:layer="layout" draw:type="curve" svg:x1="144.296cm" svg:y1="86.513cm" svg:x2="144.299cm" svg:y2="87.474cm" draw:start-shape="id139" draw:start-glue-point="2" draw:end-shape="id140" draw:end-glue-point="0" svg:d="M144296 86513c0 241 1 481 2 481 0 0 1 240 1 480" svg:viewBox="0 0 4 962">
          <text:p/>
        </draw:connector>
        <draw:custom-shape draw:style-name="gr52" draw:text-style-name="P14" xml:id="id176" draw:id="id176" draw:layer="layout" svg:width="3.048cm" svg:height="2.54cm" svg:x="129.254cm" svg:y="116.93cm">
          <text:p text:style-name="P8"><text:span text:style-name="T9">Nodab</text:span></text:p>
          <text:p text:style-name="P8"><text:span text:style-name="T10">1Ch 5: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12" xml:id="id168" draw:id="id168" draw:layer="layout" svg:width="3.048cm" svg:height="2.54cm" svg:x="8.465cm" svg:y="114.483cm">
          <text:p text:style-name="P2"><text:span text:style-name="T1">Timna</text:span></text:p>
          <text:p text:style-name="P2"><text:span text:style-name="T2">1Ch 1:39</text:span></text:p>
          <text:p text:style-name="P2"><text:span text:style-name="T2">Gen 36: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4" draw:text-style-name="P1" draw:layer="layout" draw:type="curve" svg:x1="23.51cm" svg:y1="121.132cm" svg:x2="27.597cm" svg:y2="123.093cm" draw:start-shape="id144" draw:start-glue-point="2" draw:end-shape="id145" draw:end-glue-point="0" svg:d="M23510 121132c0 1471 4087 491 4087 1961" svg:viewBox="0 0 4088 1962">
          <text:p/>
        </draw:connector>
        <draw:connector draw:style-name="gr44" draw:text-style-name="P1" draw:layer="layout" draw:type="curve" svg:x1="27.597cm" svg:y1="125.633cm" svg:x2="27.606cm" svg:y2="128.094cm" draw:start-shape="id145" draw:start-glue-point="2" draw:end-shape="id146" draw:end-glue-point="0" svg:d="M27597 125633c0 1846 9 616 9 2461" svg:viewBox="0 0 10 2462">
          <text:p/>
        </draw:connector>
        <draw:connector draw:style-name="gr44" draw:text-style-name="P1" draw:layer="layout" draw:type="curve" svg:x1="27.597cm" svg:y1="125.633cm" svg:x2="30.933cm" svg:y2="128.07cm" draw:start-shape="id145" draw:start-glue-point="2" draw:end-shape="id147" draw:end-glue-point="0" svg:d="M27597 125633c0 610 834 1219 1668 1219s1668 609 1668 1218" svg:viewBox="0 0 3337 2438">
          <text:p/>
        </draw:connector>
        <draw:connector draw:style-name="gr44" draw:text-style-name="P1" draw:layer="layout" draw:type="curve" svg:x1="20.139cm" svg:y1="117.018cm" svg:x2="23.51cm" svg:y2="118.592cm" draw:start-shape="id148" draw:start-glue-point="2" draw:end-shape="id144" svg:d="M20139 117018c0 1182 3371 395 3371 1574" svg:viewBox="0 0 3372 1575">
          <text:p/>
        </draw:connector>
        <draw:custom-shape draw:style-name="gr4" draw:text-style-name="P3" xml:id="id165" draw:id="id165" draw:layer="layout" svg:width="3.048cm" svg:height="2.54cm" svg:x="11.842cm" svg:y="110.173cm">
          <text:p text:style-name="P2"><text:span text:style-name="T1">Seir</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49" draw:id="id149" draw:layer="layout" svg:width="3.048cm" svg:height="2.54cm" svg:x="15.236cm" svg:y="114.478cm">
          <text:p text:style-name="P2"><text:span text:style-name="T1">Shobal</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0" draw:id="id160" draw:layer="layout" svg:width="3.048cm" svg:height="2.54cm" svg:x="11.835cm" svg:y="114.478cm">
          <text:p text:style-name="P2"><text:span text:style-name="T1">Lotan</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48" draw:id="id148" draw:layer="layout" svg:width="3.048cm" svg:height="2.54cm" svg:x="18.615cm" svg:y="114.478cm">
          <text:p text:style-name="P2"><text:span text:style-name="T1">Zibeon</text:span></text:p>
          <text:p text:style-name="P2"><text:span text:style-name="T2">1Ch 1:38</text:span></text:p>
          <text:p text:style-name="P2"><text:span text:style-name="T15">Hivite</text:span></text:p>
          <text:p text:style-name="P2"><text:span text:style-name="T2">Gen 36: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6" draw:id="id166" draw:layer="layout" svg:width="3.048cm" svg:height="2.54cm" svg:x="22.016cm" svg:y="114.479cm">
          <text:p text:style-name="P2"><text:span text:style-name="T1">Anah</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7" draw:id="id167" draw:layer="layout" svg:width="3.048cm" svg:height="2.54cm" svg:x="25.417cm" svg:y="114.48cm">
          <text:p text:style-name="P2"><text:span text:style-name="T1">Dishon</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4" draw:id="id154" draw:layer="layout" svg:width="3.048cm" svg:height="2.54cm" svg:x="28.818cm" svg:y="114.481cm">
          <text:p text:style-name="P2"><text:span text:style-name="T1">Ezer</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7" draw:id="id157" draw:layer="layout" svg:width="3.048cm" svg:height="2.54cm" svg:x="32.219cm" svg:y="114.482cm">
          <text:p text:style-name="P2"><text:span text:style-name="T1">Dishan</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4" draw:text-style-name="P1" draw:layer="layout" draw:type="curve" draw:line-skew="1.868cm" svg:x1="16.76cm" svg:y1="117.018cm" svg:x2="20.292cm" svg:y2="123.101cm" draw:start-shape="id149" draw:start-glue-point="2" draw:end-shape="id150" draw:end-glue-point="0" svg:d="M16760 117018c0 7365 3532 4324 3532 6083" svg:viewBox="0 0 3533 6084">
          <text:p/>
        </draw:connector>
        <draw:connector draw:style-name="gr44" draw:text-style-name="P1" draw:layer="layout" draw:type="curve" draw:line-skew="1.55cm" svg:x1="16.76cm" svg:y1="117.018cm" svg:x2="23.563cm" svg:y2="123.102cm" draw:start-shape="id149" draw:start-glue-point="2" draw:end-shape="id151" draw:end-glue-point="0" svg:d="M16760 117018c0 6889 6803 3848 6803 6084" svg:viewBox="0 0 6804 6085">
          <text:p/>
        </draw:connector>
        <draw:connector draw:style-name="gr44" draw:text-style-name="P1" draw:layer="layout" draw:type="curve" svg:x1="20.139cm" svg:y1="117.018cm" svg:x2="20.141cm" svg:y2="118.591cm" draw:start-shape="id148" draw:start-glue-point="2" draw:end-shape="id152" draw:end-glue-point="0" svg:d="M20139 117018c0 1180 2 394 2 1573" svg:viewBox="0 0 3 1574">
          <text:p/>
        </draw:connector>
        <draw:connector draw:style-name="gr44" draw:text-style-name="P1" draw:layer="layout" draw:type="curve" svg:x1="16.76cm" svg:y1="117.018cm" svg:x2="16.991cm" svg:y2="123.1cm" draw:start-shape="id149" draw:start-glue-point="2" draw:end-shape="id153" draw:end-glue-point="0" svg:d="M16760 117018c0 4563 231 1522 231 6082" svg:viewBox="0 0 232 6083">
          <text:p/>
        </draw:connector>
        <draw:connector draw:style-name="gr44" draw:text-style-name="P1" draw:layer="layout" draw:type="curve" svg:x1="30.342cm" svg:y1="117.021cm" svg:x2="30.361cm" svg:y2="118.576cm" draw:start-shape="id154" draw:start-glue-point="2" draw:end-shape="id155" draw:end-glue-point="0" svg:d="M30342 117021c0 1167 19 390 19 1555" svg:viewBox="0 0 20 1556">
          <text:p/>
        </draw:connector>
        <draw:connector draw:style-name="gr44" draw:text-style-name="P1" draw:layer="layout" draw:type="curve" svg:x1="30.342cm" svg:y1="117.021cm" svg:x2="26.964cm" svg:y2="118.575cm" draw:start-shape="id154" draw:start-glue-point="2" draw:end-shape="id156" draw:end-glue-point="0" svg:d="M30342 117021c0 1167-3378 390-3378 1554" svg:viewBox="0 0 3379 1555">
          <text:p/>
        </draw:connector>
        <draw:connector draw:style-name="gr44" draw:text-style-name="P1" draw:layer="layout" draw:type="curve" svg:x1="33.743cm" svg:y1="117.022cm" svg:x2="37.445cm" svg:y2="118.575cm" draw:start-shape="id157" draw:start-glue-point="2" draw:end-shape="id158" draw:end-glue-point="0" svg:d="M33743 117022c0 1165 3702 389 3702 1553" svg:viewBox="0 0 3703 1554">
          <text:p/>
        </draw:connector>
        <draw:connector draw:style-name="gr44" draw:text-style-name="P1" draw:layer="layout" draw:type="curve" svg:x1="30.342cm" svg:y1="117.021cm" svg:x2="33.906cm" svg:y2="118.577cm" draw:start-shape="id154" draw:start-glue-point="2" draw:end-shape="id159" draw:end-glue-point="0" svg:d="M30342 117021c0 1168 3564 391 3564 1556" svg:viewBox="0 0 3565 1557">
          <text:p/>
        </draw:connector>
        <draw:connector draw:style-name="gr44" draw:text-style-name="P1" draw:layer="layout" draw:type="curve" svg:x1="13.359cm" svg:y1="117.018cm" svg:x2="9.999cm" svg:y2="118.579cm" draw:start-shape="id160" draw:start-glue-point="2" draw:end-shape="id161" draw:end-glue-point="0" svg:d="M13359 117018c0 1171-3360 391-3360 1561" svg:viewBox="0 0 3361 1562">
          <text:p/>
        </draw:connector>
        <draw:connector draw:style-name="gr44" draw:text-style-name="P1" draw:layer="layout" draw:type="curve" draw:line-skew="1.514cm" svg:x1="16.76cm" svg:y1="117.018cm" svg:x2="10.275cm" svg:y2="123.098cm" draw:start-shape="id149" draw:start-glue-point="2" draw:end-shape="id162" draw:end-glue-point="0" svg:d="M16760 117018c0 6832-6485 3793-6485 6080" svg:viewBox="0 0 6486 6081">
          <text:p/>
        </draw:connector>
        <draw:connector draw:style-name="gr44" draw:text-style-name="P1" draw:layer="layout" draw:type="curve" draw:line-skew="1.868cm" svg:x1="16.76cm" svg:y1="117.018cm" svg:x2="13.646cm" svg:y2="123.099cm" draw:start-shape="id149" draw:start-glue-point="2" draw:end-shape="id163" draw:end-glue-point="0" svg:d="M16760 117018c0 7363-3114 4323-3114 6081" svg:viewBox="0 0 3115 6082">
          <text:p/>
        </draw:connector>
        <draw:connector draw:style-name="gr44" draw:text-style-name="P1" draw:layer="layout" draw:type="curve" svg:x1="13.359cm" svg:y1="117.018cm" svg:x2="13.36cm" svg:y2="118.579cm" draw:start-shape="id160" draw:start-glue-point="2" draw:end-shape="id164" draw:end-glue-point="0" svg:d="M13359 117018c0 1171 1 391 1 1561" svg:viewBox="0 0 2 1562">
          <text:p/>
        </draw:connector>
        <draw:connector draw:style-name="gr44" draw:text-style-name="P1" draw:layer="layout" draw:type="curve" svg:x1="13.366cm" svg:y1="112.713cm" svg:x2="20.139cm" svg:y2="114.478cm" draw:start-shape="id165" draw:start-glue-point="2" draw:end-shape="id148" draw:end-glue-point="0" svg:d="M13366 112713c0 442 1693 883 3387 883 1693 0 3386 441 3386 882" svg:viewBox="0 0 6774 1766">
          <text:p/>
        </draw:connector>
        <draw:connector draw:style-name="gr44" draw:text-style-name="P1" draw:layer="layout" draw:type="curve" svg:x1="13.366cm" svg:y1="112.713cm" svg:x2="16.76cm" svg:y2="114.478cm" draw:start-shape="id165" draw:start-glue-point="2" draw:end-shape="id149" draw:end-glue-point="0" svg:d="M13366 112713c0 442 849 883 1697 883 849 0 1697 441 1697 882" svg:viewBox="0 0 3395 1766">
          <text:p/>
        </draw:connector>
        <draw:connector draw:style-name="gr44" draw:text-style-name="P1" draw:layer="layout" draw:type="curve" svg:x1="13.366cm" svg:y1="112.713cm" svg:x2="13.359cm" svg:y2="114.478cm" draw:start-shape="id165" draw:start-glue-point="2" draw:end-shape="id160" draw:end-glue-point="0" svg:d="M13366 112713c0 1324-7 442-7 1765" svg:viewBox="0 0 8 1766">
          <text:p/>
        </draw:connector>
        <draw:connector draw:style-name="gr44" draw:text-style-name="P1" draw:layer="layout" draw:type="curve" svg:x1="13.366cm" svg:y1="112.713cm" svg:x2="23.54cm" svg:y2="114.479cm" draw:start-shape="id165" draw:start-glue-point="2" draw:end-shape="id166" draw:end-glue-point="0" svg:d="M13366 112713c0 442 2544 884 5087 884 2544 0 5087 441 5087 882" svg:viewBox="0 0 10175 1767">
          <text:p/>
        </draw:connector>
        <draw:connector draw:style-name="gr44" draw:text-style-name="P1" draw:layer="layout" draw:type="curve" svg:x1="13.366cm" svg:y1="112.713cm" svg:x2="33.743cm" svg:y2="114.482cm" draw:start-shape="id165" draw:start-glue-point="2" draw:end-shape="id157" draw:end-glue-point="0" svg:d="M13366 112713c0 443 5094 885 10189 885 5094 0 10188 442 10188 884" svg:viewBox="0 0 20378 1770">
          <text:p/>
        </draw:connector>
        <draw:connector draw:style-name="gr44" draw:text-style-name="P1" draw:layer="layout" draw:type="curve" svg:x1="13.366cm" svg:y1="112.713cm" svg:x2="30.342cm" svg:y2="114.481cm" draw:start-shape="id165" draw:start-glue-point="2" draw:end-shape="id154" draw:end-glue-point="0" svg:d="M13366 112713c0 443 4244 885 8488 885s8488 442 8488 883" svg:viewBox="0 0 16977 1769">
          <text:p/>
        </draw:connector>
        <draw:connector draw:style-name="gr44" draw:text-style-name="P1" draw:layer="layout" draw:type="curve" svg:x1="13.366cm" svg:y1="112.713cm" svg:x2="26.941cm" svg:y2="114.48cm" draw:start-shape="id165" draw:start-glue-point="2" draw:end-shape="id167" draw:end-glue-point="0" svg:d="M13366 112713c0 442 3394 884 6788 884 3393 0 6787 442 6787 883" svg:viewBox="0 0 13576 1768">
          <text:p/>
        </draw:connector>
        <draw:connector draw:style-name="gr44" draw:text-style-name="P1" draw:layer="layout" draw:type="curve" svg:x1="13.366cm" svg:y1="112.713cm" svg:x2="9.989cm" svg:y2="114.483cm" draw:start-shape="id165" draw:start-glue-point="2" draw:end-shape="id168" draw:end-glue-point="0" svg:d="M13366 112713c0 443-844 886-1689 886-844 0-1688 442-1688 884" svg:viewBox="0 0 3378 1771">
          <text:p/>
        </draw:connector>
        <draw:custom-shape draw:style-name="gr4" draw:text-style-name="P3" xml:id="id164" draw:id="id164" draw:layer="layout" svg:width="3.048cm" svg:height="2.54cm" svg:x="11.836cm" svg:y="118.579cm">
          <text:p text:style-name="P2"><text:span text:style-name="T1">Homam</text:span></text:p>
          <text:p text:style-name="P2"><text:span text:style-name="T2">1Ch 1:39</text:span></text:p>
          <text:p text:style-name="P2"><text:span text:style-name="T7">Hemam</text:span></text:p>
          <text:p text:style-name="P2"><text:span text:style-name="T2">Gen 36: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1" draw:id="id161" draw:layer="layout" svg:width="3.048cm" svg:height="2.54cm" svg:x="8.475cm" svg:y="118.579cm">
          <text:p text:style-name="P2"><text:span text:style-name="T1">Hori</text:span></text:p>
          <text:p text:style-name="P2"><text:span text:style-name="T2">1Ch 1:3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2" draw:id="id162" draw:layer="layout" svg:width="3.048cm" svg:height="2.54cm" svg:x="8.751cm" svg:y="123.098cm">
          <text:p text:style-name="P2"><text:span text:style-name="T1">Alian</text:span></text:p>
          <text:p text:style-name="P2"><text:span text:style-name="T2">1Ch 1:40</text:span></text:p>
          <text:p text:style-name="P2"><text:span text:style-name="T7">Alvan</text:span></text:p>
          <text:p text:style-name="P2"><text:span text:style-name="T2">Gen 36: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3" draw:id="id163" draw:layer="layout" svg:width="3.048cm" svg:height="2.54cm" svg:x="12.122cm" svg:y="123.099cm">
          <text:p text:style-name="P2"><text:span text:style-name="T1">Manahath</text:span></text:p>
          <text:p text:style-name="P2"><text:span text:style-name="T2">1Ch 1: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3" draw:id="id153" draw:layer="layout" svg:width="3.048cm" svg:height="2.54cm" svg:x="15.467cm" svg:y="123.1cm">
          <text:p text:style-name="P2"><text:span text:style-name="T1">Ebal</text:span></text:p>
          <text:p text:style-name="P2"><text:span text:style-name="T2">1Ch 1: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0" draw:id="id150" draw:layer="layout" svg:width="3.048cm" svg:height="2.54cm" svg:x="18.768cm" svg:y="123.101cm">
          <text:p text:style-name="P2"><text:span text:style-name="T1">Shephi</text:span></text:p>
          <text:p text:style-name="P2"><text:span text:style-name="T2">1Ch 1:40</text:span></text:p>
          <text:p text:style-name="P2"><text:span text:style-name="T7">Shepho</text:span></text:p>
          <text:p text:style-name="P2"><text:span text:style-name="T2">Gen 36: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1" draw:id="id151" draw:layer="layout" svg:width="3.048cm" svg:height="2.54cm" svg:x="22.039cm" svg:y="123.102cm">
          <text:p text:style-name="P2"><text:span text:style-name="T1">Onam</text:span></text:p>
          <text:p text:style-name="P2"><text:span text:style-name="T2">1Ch 1: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2" draw:id="id152" draw:layer="layout" svg:width="3.048cm" svg:height="2.54cm" svg:x="18.617cm" svg:y="118.591cm">
          <text:p text:style-name="P2"><text:span text:style-name="T1">Aiah</text:span></text:p>
          <text:p text:style-name="P2"><text:span text:style-name="T2">1Ch 1:40</text:span></text:p>
          <text:p text:style-name="P2"><text:span text:style-name="T7">Ajah</text:span></text:p>
          <text:p text:style-name="P2"><text:span text:style-name="T2">Gen 36: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 draw:text-style-name="P16" xml:id="id144" draw:id="id144" draw:layer="layout" svg:width="3.048cm" svg:height="2.54cm" svg:x="21.986cm" svg:y="118.592cm">
          <text:p text:style-name="P2"><text:span text:style-name="T1">Anah</text:span></text:p>
          <text:p text:style-name="P2"><text:span text:style-name="T2">1Ch 1:40</text:span></text:p>
          <text:p text:style-name="P2"><text:span text:style-name="T2">Gen 36:2,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45" draw:id="id145" draw:layer="layout" svg:width="3.048cm" svg:height="2.54cm" svg:x="26.073cm" svg:y="123.093cm">
          <text:p text:style-name="P2"><text:span text:style-name="T1">Dishon</text:span></text:p>
          <text:p text:style-name="P2"><text:span text:style-name="T2">1Ch 1: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46" draw:id="id146" draw:layer="layout" svg:width="3.048cm" svg:height="2.54cm" svg:x="26.082cm" svg:y="128.094cm">
          <text:p text:style-name="P2"><text:span text:style-name="T1">Amram</text:span></text:p>
          <text:p text:style-name="P2"><text:span text:style-name="T2">1Ch 1:41</text:span></text:p>
          <text:p text:style-name="P2"><text:span text:style-name="T7">Hemdan</text:span></text:p>
          <text:p text:style-name="P2"><text:span text:style-name="T2">Gen 36: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47" draw:id="id147" draw:layer="layout" svg:width="3.048cm" svg:height="2.54cm" svg:x="29.409cm" svg:y="128.07cm">
          <text:p text:style-name="P2"><text:span text:style-name="T1">Eshban</text:span></text:p>
          <text:p text:style-name="P2"><text:span text:style-name="T2">1Ch 1: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9" draw:id="id169" draw:layer="layout" svg:width="3.048cm" svg:height="2.54cm" svg:x="32.71cm" svg:y="128.071cm">
          <text:p text:style-name="P2"><text:span text:style-name="T1">Ithran</text:span></text:p>
          <text:p text:style-name="P2"><text:span text:style-name="T2">1Ch 1: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0" draw:id="id170" draw:layer="layout" svg:width="3.048cm" svg:height="2.54cm" svg:x="36.111cm" svg:y="128.072cm">
          <text:p text:style-name="P2"><text:span text:style-name="T1">Cheran</text:span></text:p>
          <text:p text:style-name="P2"><text:span text:style-name="T2">1Ch 1: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4" draw:text-style-name="P1" draw:layer="layout" draw:type="curve" svg:x1="27.597cm" svg:y1="125.633cm" svg:x2="34.234cm" svg:y2="128.071cm" draw:start-shape="id145" draw:start-glue-point="2" draw:end-shape="id169" draw:end-glue-point="0" svg:d="M27597 125633c0 610 1659 1220 3319 1220 1659 0 3318 609 3318 1218" svg:viewBox="0 0 6638 2439">
          <text:p/>
        </draw:connector>
        <draw:connector draw:style-name="gr44" draw:text-style-name="P1" draw:layer="layout" draw:type="curve" svg:x1="27.597cm" svg:y1="125.633cm" svg:x2="37.635cm" svg:y2="128.072cm" draw:start-shape="id145" draw:start-glue-point="2" draw:end-shape="id170" draw:end-glue-point="0" svg:d="M27597 125633c0 610 2510 1220 5019 1220 2510 0 5019 610 5019 1219" svg:viewBox="0 0 10039 2440">
          <text:p/>
        </draw:connector>
        <draw:custom-shape draw:style-name="gr4" draw:text-style-name="P3" xml:id="id156" draw:id="id156" draw:layer="layout" svg:width="3.048cm" svg:height="2.54cm" svg:x="25.44cm" svg:y="118.575cm">
          <text:p text:style-name="P2"><text:span text:style-name="T1">Bilhan</text:span></text:p>
          <text:p text:style-name="P2"><text:span text:style-name="T2">1Ch 1: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5" draw:id="id155" draw:layer="layout" svg:width="3.048cm" svg:height="2.54cm" svg:x="28.837cm" svg:y="118.576cm">
          <text:p text:style-name="P2"><text:span text:style-name="T1">Zavan</text:span></text:p>
          <text:p text:style-name="P2"><text:span text:style-name="T2">1Ch 1:42</text:span></text:p>
          <text:p text:style-name="P4"><text:span text:style-name="T3">Zaavan</text:span></text:p>
          <text:p text:style-name="P4"><text:span text:style-name="T2">Gen 36: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9" draw:id="id159" draw:layer="layout" svg:width="3.048cm" svg:height="2.54cm" svg:x="32.382cm" svg:y="118.577cm">
          <text:p text:style-name="P2"><text:span text:style-name="T1">Jakan</text:span></text:p>
          <text:p text:style-name="P2"><text:span text:style-name="T2">1Ch 1:42</text:span></text:p>
          <text:p text:style-name="P4"><text:span text:style-name="T3">Akan</text:span></text:p>
          <text:p text:style-name="P4"><text:span text:style-name="T2">Gen 36: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8" draw:id="id158" draw:layer="layout" svg:width="3.048cm" svg:height="2.54cm" svg:x="35.921cm" svg:y="118.575cm">
          <text:p text:style-name="P2"><text:span text:style-name="T1">Uz</text:span></text:p>
          <text:p text:style-name="P2"><text:span text:style-name="T2">1Ch 1: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1" draw:id="id171" draw:layer="layout" svg:width="3.048cm" svg:height="2.54cm" svg:x="39.388cm" svg:y="118.576cm">
          <text:p text:style-name="P2"><text:span text:style-name="T1">Aran</text:span></text:p>
          <text:p text:style-name="P2"><text:span text:style-name="T2">1Ch 1: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4" draw:text-style-name="P1" draw:layer="layout" draw:type="curve" svg:x1="33.743cm" svg:y1="117.022cm" svg:x2="40.912cm" svg:y2="118.576cm" draw:start-shape="id157" draw:start-glue-point="2" draw:end-shape="id171" draw:end-glue-point="0" svg:d="M33743 117022c0 1167 7169 390 7169 1554" svg:viewBox="0 0 7170 1555">
          <text:p/>
        </draw:connector>
        <draw:custom-shape draw:style-name="gr51" draw:text-style-name="P15" draw:layer="layout" svg:width="3.048cm" svg:height="2.54cm" svg:x="85.13cm" svg:y="134.482cm">
          <text:p text:style-name="P2"><text:span text:style-name="T1">Aliah</text:span></text:p>
          <text:p text:style-name="P2"><text:span text:style-name="T2">1Ch 1:51</text:span></text:p>
          <text:p text:style-name="P2"><text:span text:style-name="T7">Alvah</text:span></text:p>
          <text:p text:style-name="P2"><text:span text:style-name="T2">Gen 36:4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13" draw:layer="layout" svg:width="3.048cm" svg:height="2.54cm" svg:x="81.629cm" svg:y="134.482cm">
          <text:p text:style-name="P2"><text:span text:style-name="T1">Timnah</text:span></text:p>
          <text:p text:style-name="P2"><text:span text:style-name="T2">1Ch 1:51</text:span></text:p>
          <text:p text:style-name="P2"><text:span text:style-name="T2">Gen 36:4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5" draw:layer="layout" svg:width="3.048cm" svg:height="2.54cm" svg:x="88.509cm" svg:y="134.482cm">
          <text:p text:style-name="P2"><text:span text:style-name="T1">Jetheth</text:span></text:p>
          <text:p text:style-name="P2"><text:span text:style-name="T2">1Ch 1: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 draw:text-style-name="P15" draw:layer="layout" svg:width="3.302cm" svg:height="2.54cm" svg:x="81.634cm" svg:y="137.383cm">
          <text:p text:style-name="P2"><text:span text:style-name="T1">Aholibamah</text:span></text:p>
          <text:p text:style-name="P2"><text:span text:style-name="T2">1Ch 1:5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5" draw:layer="layout" svg:width="3.048cm" svg:height="2.54cm" svg:x="85.111cm" svg:y="137.384cm">
          <text:p text:style-name="P2"><text:span text:style-name="T1">Elah</text:span></text:p>
          <text:p text:style-name="P2"><text:span text:style-name="T2">1Ch 1:5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5" draw:layer="layout" svg:width="3.048cm" svg:height="2.54cm" svg:x="88.474cm" svg:y="137.385cm">
          <text:p text:style-name="P2"><text:span text:style-name="T1">Pinon</text:span></text:p>
          <text:p text:style-name="P2"><text:span text:style-name="T2">1Ch 1:5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13" draw:layer="layout" svg:width="3.048cm" svg:height="2.54cm" svg:x="81.661cm" svg:y="140.286cm">
          <text:p text:style-name="P2"><text:span text:style-name="T1">Kenaz</text:span></text:p>
          <text:p text:style-name="P2"><text:span text:style-name="T2">1Ch 1:53</text:span></text:p>
          <text:p text:style-name="P2"><text:span text:style-name="T2">Gen 36: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13" draw:layer="layout" svg:width="3.048cm" svg:height="2.54cm" svg:x="85.148cm" svg:y="140.284cm">
          <text:p text:style-name="P2"><text:span text:style-name="T1">Teman</text:span></text:p>
          <text:p text:style-name="P2"><text:span text:style-name="T2">1Ch 1:53</text:span></text:p>
          <text:p text:style-name="P2"><text:span text:style-name="T2">Gen 36: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5" draw:layer="layout" svg:width="3.048cm" svg:height="2.54cm" svg:x="88.493cm" svg:y="140.285cm">
          <text:p text:style-name="P2"><text:span text:style-name="T1">Mibzar</text:span></text:p>
          <text:p text:style-name="P2"><text:span text:style-name="T2">1Ch 1:5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5" draw:layer="layout" svg:width="3.048cm" svg:height="2.54cm" svg:x="81.613cm" svg:y="143.186cm">
          <text:p text:style-name="P2"><text:span text:style-name="T1">Magdiel</text:span></text:p>
          <text:p text:style-name="P2"><text:span text:style-name="T2">1Ch 1:5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5" draw:layer="layout" svg:width="3.048cm" svg:height="2.54cm" svg:x="85.114cm" svg:y="143.187cm">
          <text:p text:style-name="P2"><text:span text:style-name="T1">Iram</text:span></text:p>
          <text:p text:style-name="P2"><text:span text:style-name="T2">1Ch 1:5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3" draw:id="id173" draw:layer="layout" svg:width="3.048cm" svg:height="2.54cm" svg:x="13.941cm" svg:y="58.26cm">
          <text:p text:style-name="P2"><text:span text:style-name="T1">Dedan</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2" draw:id="id172" draw:layer="layout" svg:width="3.048cm" svg:height="2.54cm" svg:x="10.666cm" svg:y="58.26cm">
          <text:p text:style-name="P2"><text:span text:style-name="T1">Sheba</text:span></text:p>
          <text:p text:style-name="P4"><text:span text:style-name="T2">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svg:x1="13.799cm" svg:y1="56.474cm" svg:x2="12.19cm" svg:y2="58.26cm" draw:start-shape="id38" draw:start-glue-point="2" draw:end-shape="id172" draw:end-glue-point="0" svg:d="M13799 56474c0 447-402 894-805 894-402 0-804 446-804 892" svg:viewBox="0 0 1610 1787">
          <text:p/>
        </draw:connector>
        <draw:connector draw:style-name="gr7" draw:text-style-name="P1" draw:layer="layout" draw:type="curve" svg:x1="13.799cm" svg:y1="56.474cm" svg:x2="15.465cm" svg:y2="58.26cm" draw:start-shape="id38" draw:start-glue-point="2" draw:end-shape="id173" draw:end-glue-point="0" svg:d="M13799 56474c0 447 417 894 833 894 417 0 833 446 833 892" svg:viewBox="0 0 1667 1787">
          <text:p/>
        </draw:connector>
        <draw:custom-shape draw:style-name="gr56" draw:text-style-name="P10" xml:id="id174" draw:id="id174" draw:layer="layout" svg:width="3.048cm" svg:height="5.74cm" svg:x="41.267cm" svg:y="57.086cm">
          <text:p text:style-name="P8"><text:span text:style-name="T9">Philistines</text:span></text:p>
          <text:p text:style-name="P9"><text:span text:style-name="T10">1Ch 1:12</text:span></text:p>
          <text:p text:style-name="P8"><text:span text:style-name="T9">Philistim</text:span></text:p>
          <text:p text:style-name="P8"><text:span text:style-name="T10">Gen 10:14</text:span></text:p>
          <text:p text:style-name="P8"><text:span text:style-name="T9">Palestina</text:span></text:p>
          <text:p text:style-name="P8"><text:span text:style-name="T10">Exo 15:14</text:span></text:p>
          <text:p text:style-name="P8"><text:span text:style-name="T9">Palestine</text:span></text:p>
          <text:p text:style-name="P8"><text:span text:style-name="T10">Joe 3:4</text:span></text:p>
          <text:p text:style-name="P8"><text:span text:style-name="T9">Philistia</text:span></text:p>
          <text:p text:style-name="P8"><text:span text:style-name="T10">Psa 60:8, 87:4, 108: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8" draw:text-style-name="P1" draw:layer="layout" draw:type="curve" svg:x1="42.796cm" svg:y1="56.466cm" svg:x2="42.791cm" svg:y2="57.086cm" draw:start-shape="id72" draw:start-glue-point="2" draw:end-shape="id174" draw:end-glue-point="0" svg:d="M42796 56466c0 466-5 157-5 620" svg:viewBox="0 0 6 621">
          <text:p/>
        </draw:connector>
        <draw:custom-shape draw:style-name="gr30" draw:text-style-name="P12" xml:id="id124" draw:id="id124" draw:layer="layout" svg:width="3.048cm" svg:height="2.54cm" svg:x="88.741cm" svg:y="116.9cm">
          <text:p text:style-name="P2"><text:span text:style-name="T1">Bashemath</text:span></text:p>
          <text:p text:style-name="P4"><text:span text:style-name="T2">Gen 36:3</text:span></text:p>
          <text:p text:style-name="P2"><text:span text:style-name="T1">Mahalath</text:span></text:p>
          <text:p text:style-name="P2"><text:span text:style-name="T2">Gen 28: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90.251cm" svg:y1="113.606cm" svg:x2="90.265cm" svg:y2="116.9cm" draw:start-shape="id50" draw:start-glue-point="2" draw:end-shape="id124" draw:end-glue-point="0" svg:d="M90251 113606c0 824 4 1648 7 1648 4 0 7 823 7 1646" svg:viewBox="0 0 15 3295">
          <text:p/>
        </draw:connector>
        <draw:custom-shape draw:style-name="gr30" draw:text-style-name="P12" xml:id="id175" draw:id="id175" draw:layer="layout" svg:width="3.048cm" svg:height="2.54cm" svg:x="92.443cm" svg:y="105.895cm">
          <text:p text:style-name="P2"><text:span text:style-name="T1">Hagar</text:span></text:p>
          <text:p text:style-name="P2"><text:span text:style-name="T2">1Ch 5:19</text:span></text:p>
          <text:p text:style-name="P2"><text:span text:style-name="T2">Gen 1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9" draw:text-style-name="P1" xml:id="id92" draw:id="id92" draw:layer="layout" draw:type="curve" svg:x1="92.443cm" svg:y1="107.165cm" svg:x2="88.001cm" svg:y2="107.168cm" draw:start-shape="id175" draw:start-glue-point="3" draw:end-shape="id91" draw:end-glue-point="1" svg:d="M92443 107165c-3330 0-1109 3-4442 3" svg:viewBox="0 0 4443 4">
          <text:p/>
        </draw:connector>
        <draw:connector draw:style-name="gr7" draw:text-style-name="P1" draw:layer="layout" draw:type="curve" svg:x1="93.967cm" svg:y1="108.435cm" svg:x2="130.778cm" svg:y2="116.93cm" draw:start-shape="id175" draw:start-glue-point="2" draw:end-shape="id176" draw:end-glue-point="0" svg:d="M93967 108435c0 2124 9203 4248 18406 4248 9202 0 18405 2124 18405 4247" svg:viewBox="0 0 36812 8496">
          <text:p/>
        </draw:connector>
        <draw:connector draw:style-name="gr1" draw:text-style-name="P1" draw:layer="layout" draw:type="curve" svg:x1="86.492cm" svg:y1="113.606cm" svg:x2="75.582cm" svg:y2="116.902cm" draw:start-shape="id95" draw:start-glue-point="2" draw:end-shape="id177" draw:end-glue-point="0" svg:d="M86492 113606c0 825-2728 1649-5455 1649-2728 0-5455 824-5455 1647" svg:viewBox="0 0 10911 3297">
          <text:p/>
        </draw:connector>
        <draw:custom-shape draw:style-name="gr57" draw:text-style-name="P18" draw:layer="layout" svg:width="23.05cm" svg:height="6.341cm" svg:x="75.772cm" svg:y="36.274cm">
          <text:p text:style-name="P17"><text:span text:style-name="T16">1 </text:span><text:span text:style-name="T17">Chronicles</text:span><text:span text:style-name="T16"> 1</text:span></text:p>
          <draw:enhanced-geometry svg:viewBox="0 0 21600 21600" draw:type="rectangle" draw:enhanced-path="M 0 0 L 21600 0 21600 21600 0 21600 0 0 Z N"/>
        </draw:custom-shape>
        <draw:connector draw:style-name="gr7" draw:text-style-name="P1" draw:layer="layout" draw:type="curve" svg:x1="93.17cm" svg:y1="47.924cm" svg:x2="103.137cm" svg:y2="50.753cm" draw:start-shape="id47" draw:start-glue-point="2" draw:end-shape="id178" draw:end-glue-point="0" svg:d="M93170 47924c0 2122 9967 708 9967 2829" svg:viewBox="0 0 9968 2830">
          <text:p/>
        </draw:connector>
        <draw:connector draw:style-name="gr58" draw:text-style-name="P1" draw:layer="layout" draw:type="line" svg:x1="86.386cm" svg:y1="8.9cm" svg:x2="86.385cm" svg:y2="9.419cm" draw:start-shape="id179" draw:start-glue-point="2" draw:end-shape="id180" draw:end-glue-point="0" svg:d="M86386 8900l-1 519" svg:viewBox="0 0 2 520">
          <text:p/>
        </draw:connector>
        <draw:connector draw:style-name="gr58" draw:text-style-name="P1" draw:layer="layout" draw:type="line" svg:x1="86.383cm" svg:y1="5.89cm" svg:x2="86.386cm" svg:y2="6.36cm" draw:start-shape="id181" draw:start-glue-point="2" draw:end-shape="id179" draw:end-glue-point="0" svg:d="M86383 5890l3 470" svg:viewBox="0 0 4 471">
          <text:p/>
        </draw:connector>
        <draw:connector draw:style-name="gr58" draw:text-style-name="P1" draw:layer="layout" draw:type="line" svg:x1="86.385cm" svg:y1="11.959cm" svg:x2="86.387cm" svg:y2="12.443cm" draw:start-shape="id180" draw:start-glue-point="2" draw:end-shape="id182" draw:end-glue-point="0" svg:d="M86385 11959l2 484" svg:viewBox="0 0 3 485">
          <text:p/>
        </draw:connector>
        <draw:connector draw:style-name="gr58" draw:text-style-name="P1" draw:layer="layout" draw:type="line" svg:x1="86.387cm" svg:y1="14.983cm" svg:x2="86.387cm" svg:y2="15.473cm" draw:start-shape="id182" draw:start-glue-point="2" draw:end-shape="id183" draw:end-glue-point="0" svg:d="M86387 14983v490" svg:viewBox="0 0 1 491">
          <text:p/>
        </draw:connector>
        <draw:connector draw:style-name="gr58" draw:text-style-name="P1" draw:layer="layout" draw:type="line" svg:x1="86.387cm" svg:y1="18.013cm" svg:x2="86.393cm" svg:y2="18.43cm" draw:start-shape="id183" draw:start-glue-point="2" draw:end-shape="id184" draw:end-glue-point="0" svg:d="M86387 18013l6 417" svg:viewBox="0 0 7 418">
          <text:p/>
        </draw:connector>
        <draw:connector draw:style-name="gr58" draw:text-style-name="P1" draw:layer="layout" draw:type="line" svg:x1="86.393cm" svg:y1="20.97cm" svg:x2="86.393cm" svg:y2="21.605cm" draw:start-shape="id184" draw:start-glue-point="2" draw:end-shape="id185" draw:end-glue-point="0" svg:d="M86393 20970v635" svg:viewBox="0 0 1 636">
          <text:p/>
        </draw:connector>
        <draw:connector draw:style-name="gr58" draw:text-style-name="P1" draw:layer="layout" draw:type="line" svg:x1="86.393cm" svg:y1="24.145cm" svg:x2="86.4cm" svg:y2="24.753cm" draw:start-shape="id185" draw:start-glue-point="2" draw:end-shape="id186" draw:end-glue-point="0" svg:d="M86393 24145l7 608" svg:viewBox="0 0 8 609">
          <text:p/>
        </draw:connector>
        <draw:connector draw:style-name="gr58" draw:text-style-name="P1" draw:layer="layout" draw:type="line" svg:x1="86.4cm" svg:y1="27.293cm" svg:x2="86.405cm" svg:y2="27.855cm" draw:start-shape="id186" draw:start-glue-point="2" draw:end-shape="id187" draw:end-glue-point="0" svg:d="M86400 27293l5 562" svg:viewBox="0 0 6 563">
          <text:p/>
        </draw:connector>
        <draw:connector draw:style-name="gr58" draw:text-style-name="P1" draw:layer="layout" draw:type="line" svg:x1="86.405cm" svg:y1="30.395cm" svg:x2="86.42cm" svg:y2="30.93cm" draw:start-shape="id187" draw:start-glue-point="2" draw:end-shape="id16" draw:end-glue-point="0" svg:d="M86405 30395l15 535" svg:viewBox="0 0 16 536">
          <text:p/>
        </draw:connector>
        <draw:custom-shape draw:style-name="gr30" draw:text-style-name="P12" xml:id="id123" draw:id="id123" draw:layer="layout" svg:width="3.048cm" svg:height="2.54cm" svg:x="77.742cm" svg:y="116.909cm">
          <text:p text:style-name="P2"><text:span text:style-name="T3">Adah</text:span></text:p>
          <text:p text:style-name="P2"><text:span text:style-name="T4">Gen 36: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9" draw:text-style-name="P1" draw:layer="layout" draw:type="curve" svg:x1="84.972cm" svg:y1="118.171cm" svg:x2="80.79cm" svg:y2="118.179cm" draw:start-shape="id117" draw:start-glue-point="3" draw:end-shape="id123" draw:end-glue-point="1" svg:d="M84972 118171c-3135 0-1044 8-4182 8" svg:viewBox="0 0 4183 9">
          <text:p/>
        </draw:connector>
        <draw:connector draw:style-name="gr29" draw:text-style-name="P1" draw:layer="layout" draw:type="curve" svg:x1="88.02cm" svg:y1="118.171cm" svg:x2="88.741cm" svg:y2="118.17cm" draw:start-shape="id117" draw:start-glue-point="1" draw:end-shape="id124" draw:end-glue-point="3" svg:d="M88020 118171c541 0 181-1 721-1" svg:viewBox="0 0 722 2">
          <text:p/>
        </draw:connector>
        <draw:custom-shape draw:style-name="gr59" draw:text-style-name="P20" draw:layer="layout" svg:width="3.347cm" svg:height="6.487cm" svg:x="129.116cm" svg:y="116.788cm">
          <text:p text:style-name="P19"><text:span text:style-name="T18">Probably a male but we can’t confirm his identity other than being a Hagar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 draw:text-style-name="P12" xml:id="id115" draw:id="id115" draw:layer="layout" svg:width="3.302cm" svg:height="2.54cm" svg:x="29.674cm" svg:y="123.094cm">
          <text:p text:style-name="P2"><text:span text:style-name="T1">Aholibamah</text:span></text:p>
          <text:p text:style-name="P2"><text:span text:style-name="T2">Gen 36: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4" draw:text-style-name="P1" draw:layer="layout" draw:type="curve" svg:x1="23.51cm" svg:y1="121.132cm" svg:x2="31.325cm" svg:y2="123.094cm" draw:start-shape="id144" draw:start-glue-point="2" draw:end-shape="id115" draw:end-glue-point="0" svg:d="M23510 121132c0 1473 7815 492 7815 1962" svg:viewBox="0 0 7816 1963">
          <text:p/>
        </draw:connector>
        <draw:connector draw:style-name="gr29" draw:text-style-name="P1" draw:layer="layout" draw:type="curve" draw:line-skew="18.33cm" svg:x1="84.972cm" svg:y1="118.171cm" svg:x2="32.976cm" svg:y2="124.364cm" draw:start-shape="id117" draw:start-glue-point="3" draw:end-shape="id115" draw:end-glue-point="1" svg:d="M84972 118171c-11500 0 14497 6193-51996 6193" svg:viewBox="0 0 51997 6194">
          <text:p/>
        </draw:connector>
        <draw:custom-shape draw:style-name="gr4" draw:text-style-name="P3" xml:id="id188" draw:id="id188" draw:layer="layout" svg:width="3.048cm" svg:height="2.54cm" svg:x="11.845cm" svg:y="102.378cm">
          <text:p text:style-name="P2"><text:span text:style-name="T1">Canaan</text:span></text:p>
          <text:p text:style-name="P2"><text:span text:style-name="T2">Gen 36: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1" draw:text-style-name="P1" draw:layer="layout" draw:type="curve" svg:x1="13.369cm" svg:y1="104.918cm" svg:x2="13.372cm" svg:y2="105.471cm" draw:start-shape="id188" draw:start-glue-point="2" draw:end-shape="id189" draw:end-glue-point="0" svg:d="M13369 104918c0 139 1 277 2 277 0 0 1 138 1 276" svg:viewBox="0 0 4 554">
          <text:p/>
        </draw:connector>
        <draw:custom-shape draw:style-name="gr30" draw:text-style-name="P12" xml:id="id10" draw:id="id10" draw:layer="layout" svg:width="3.048cm" svg:height="2.54cm" svg:x="81.718cm" svg:y="122.085cm">
          <text:p text:style-name="P2"><text:span text:style-name="T3">Timna</text:span></text:p>
          <text:p text:style-name="P2"><text:span text:style-name="T4">Gen 36: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9" draw:text-style-name="P1" draw:layer="layout" draw:type="curve" svg:x1="81.718cm" svg:y1="123.355cm" svg:x2="80.787cm" svg:y2="123.354cm" draw:start-shape="id10" draw:start-glue-point="3" draw:end-shape="id113" draw:end-glue-point="1" svg:d="M81718 123355c-697 0-232-1-931-1" svg:viewBox="0 0 932 2">
          <text:p/>
        </draw:connector>
        <draw:custom-shape draw:style-name="gr33" draw:text-style-name="P3" xml:id="id190" draw:id="id190" draw:layer="layout" svg:width="3.2cm" svg:height="2.642cm" svg:x="77.662cm" svg:y="128.038cm">
          <text:p text:style-name="P2"><text:span text:style-name="T7">Duke Korah</text:span></text:p>
          <text:p text:style-name="P4"><text:span text:style-name="T2">Gen 36: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svg:x1="79.263cm" svg:y1="124.624cm" svg:x2="79.262cm" svg:y2="128.038cm" draw:start-shape="id113" draw:start-glue-point="2" draw:end-shape="id190" draw:end-glue-point="0" svg:d="M79263 124624c0 2562-1 855-1 3414" svg:viewBox="0 0 2 3415">
          <text:p/>
        </draw:connector>
        <draw:custom-shape draw:style-name="gr62" draw:text-style-name="P22" draw:layer="layout" svg:width="27.622cm" svg:height="2.907cm" svg:x="11.745cm" svg:y="114.308cm">
          <text:p text:style-name="P21"><text:span text:style-name="T18">Dukes of the Horites</text:span></text:p>
          <text:p text:style-name="P21"><text:span text:style-name="T18">in the land of Edom</text:span></text:p>
          <text:p text:style-name="P21"><text:span text:style-name="T18">(previously known as</text:span></text:p>
          <text:p text:style-name="P21"><text:span text:style-name="T18">Seir/mount Seir)</text:span></text:p>
          <text:p text:style-name="P21"><text:span text:style-name="T18">Gen 14:6, 36:20,21,30</text:span></text:p>
          <text:p text:style-name="P21"><text:span text:style-name="T18">Deu 2:12,22</text:span></text:p>
          <draw:enhanced-geometry svg:viewBox="0 0 21600 21600" draw:type="rectangle" draw:enhanced-path="M 0 0 L 21600 0 21600 21600 0 21600 0 0 Z N"/>
        </draw:custom-shape>
        <draw:custom-shape draw:style-name="gr63" draw:text-style-name="P7" xml:id="id189" draw:id="id189" draw:layer="layout" svg:width="3.048cm" svg:height="3.2cm" svg:x="11.848cm" svg:y="105.471cm">
          <text:p text:style-name="P2"><text:span text:style-name="T1">Hori</text:span></text:p>
          <text:p text:style-name="P2"><text:span text:style-name="T4">Gen 36:30</text:span></text:p>
          <text:p text:style-name="P2"><text:span text:style-name="T1">Horites</text:span></text:p>
          <text:p text:style-name="P2"><text:span text:style-name="T2">Gen 36:29</text:span></text:p>
          <text:p text:style-name="P2"><text:span text:style-name="T7">Horims</text:span></text:p>
          <text:p text:style-name="P2"><text:span text:style-name="T2">Deu 2:12,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4" draw:text-style-name="P1" draw:layer="layout" draw:type="curve" svg:x1="13.372cm" svg:y1="108.671cm" svg:x2="13.366cm" svg:y2="110.173cm" draw:start-shape="id189" draw:start-glue-point="2" draw:end-shape="id165" draw:end-glue-point="0" svg:d="M13372 108671c0 376-2 752-3 752-2 0-3 375-3 750" svg:viewBox="0 0 7 1503">
          <text:p/>
        </draw:connector>
        <draw:custom-shape draw:style-name="gr64" draw:text-style-name="P23" xml:id="id191" draw:id="id191" draw:layer="layout" svg:width="3.048cm" svg:height="2.54cm" svg:x="146.927cm" svg:y="62.176cm">
          <text:p text:style-name="P2"><text:span text:style-name="T1">Dinhabah</text:span></text:p>
          <text:p text:style-name="P2"><text:span text:style-name="T2">1Ch 1:4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5" draw:text-style-name="P1" draw:layer="layout" draw:type="curve" svg:x1="148.451cm" svg:y1="62.176cm" svg:x2="144.293cm" svg:y2="60.81cm" draw:start-shape="id191" draw:start-glue-point="0" draw:end-shape="id132" draw:end-glue-point="2" svg:d="M148451 62176c0-341-1040-682-2079-682-1040 0-2079-342-2079-684" svg:viewBox="0 0 4159 1367">
          <text:p/>
        </draw:connector>
        <draw:custom-shape draw:style-name="gr66" draw:text-style-name="P20" xml:id="id192" draw:id="id192" draw:layer="layout" svg:width="8.889cm" svg:height="4.762cm" svg:x="127.71cm" svg:y="74.737cm">
          <text:p text:style-name="P19"><text:span text:style-name="T18">There were two locations named Rehoboth. A city builded by Asshur son of Shem and a well dug by Isaac son of Abraham (Gen 10:11 &amp; Gen 26:22) and this one is said to be “by the river”. The one that Asshur builded is grouped with Nineveh, Calah, &amp; Resen which are all by the Tigris river. The location of the well that Isaac dug was in the valley of Gerar when Isaac was traveling from Philistia to Beersheba, not near any river that we know o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7" draw:text-style-name="P20" xml:id="id200" draw:id="id200" draw:layer="layout" svg:width="3.546cm" svg:height="2.945cm" svg:x="142.515cm" svg:y="53.8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8" draw:text-style-name="P24" draw:layer="layout" draw:type="curve" svg:x1="136.599cm" svg:y1="77.118cm" svg:x2="138.369cm" svg:y2="77.11cm" draw:start-shape="id192" draw:start-glue-point="1" draw:end-shape="id193" draw:end-glue-point="3" svg:d="M136599 77118c1327 0 443-8 1770-8" svg:viewBox="0 0 1771 9">
          <text:p/>
        </draw:connector>
        <draw:custom-shape draw:style-name="gr64" draw:text-style-name="P23" xml:id="id194" draw:id="id194" draw:layer="layout" svg:width="3.048cm" svg:height="2.54cm" svg:x="138.562cm" svg:y="54.024cm">
          <text:p text:style-name="P2"><text:span text:style-name="T1">Bozrah</text:span></text:p>
          <text:p text:style-name="P2"><text:span text:style-name="T2">1Ch 1:4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5" draw:text-style-name="P1" draw:layer="layout" draw:type="curve" svg:x1="140.086cm" svg:y1="56.564cm" svg:x2="140.093cm" svg:y2="58.269cm" draw:start-shape="id194" draw:start-glue-point="2" draw:end-shape="id129" draw:end-glue-point="0" svg:d="M140086 56564c0 427 2 853 4 853 1 0 3 426 3 852" svg:viewBox="0 0 8 1706">
          <text:p/>
        </draw:connector>
        <draw:custom-shape draw:style-name="gr69" draw:text-style-name="P10" xml:id="id195" draw:id="id195" draw:layer="layout" svg:width="3.099cm" svg:height="2.54cm" svg:x="138.565cm" svg:y="62.234cm">
          <text:p text:style-name="P8"><text:span text:style-name="T9">Temanites</text:span></text:p>
          <text:p text:style-name="P8"><text:span text:style-name="T10">1Ch 1:45</text:span></text:p>
          <text:p text:style-name="P8"><text:span text:style-name="T10">Job 2:11</text:span></text:p>
          <text:p text:style-name="P9"><text:span text:style-name="T9">Temani</text:span></text:p>
          <text:p text:style-name="P9"><text:span text:style-name="T10">Gen 36:3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0" draw:text-style-name="P1" draw:layer="layout" draw:type="curve" svg:x1="140.114cm" svg:y1="64.774cm" svg:x2="144.295cm" svg:y2="66.672cm" draw:start-shape="id195" draw:start-glue-point="2" draw:end-shape="id133" draw:end-glue-point="0" svg:d="M140114 64774c0 475 1045 950 2091 950 1045 0 2090 474 2090 948" svg:viewBox="0 0 4182 1899">
          <text:p/>
        </draw:connector>
        <draw:custom-shape draw:style-name="gr64" draw:text-style-name="P23" xml:id="id196" draw:id="id196" draw:layer="layout" svg:width="3.048cm" svg:height="2.54cm" svg:x="146.863cm" svg:y="75.774cm">
          <text:p text:style-name="P2"><text:span text:style-name="T1">Avith</text:span></text:p>
          <text:p text:style-name="P2"><text:span text:style-name="T2">1Ch 1: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5" draw:text-style-name="P1" draw:layer="layout" draw:type="curve" svg:x1="148.387cm" svg:y1="75.774cm" svg:x2="144.295cm" svg:y2="73.612cm" draw:start-shape="id196" draw:start-glue-point="0" draw:end-shape="id135" draw:end-glue-point="2" svg:d="M148387 75774c0-540-1023-1080-2046-1080s-2046-541-2046-1082" svg:viewBox="0 0 4093 2163">
          <text:p/>
        </draw:connector>
        <draw:custom-shape draw:style-name="gr64" draw:text-style-name="P23" xml:id="id197" draw:id="id197" draw:layer="layout" svg:width="3.048cm" svg:height="2.54cm" svg:x="138.589cm" svg:y="71.101cm">
          <text:p text:style-name="P2"><text:span text:style-name="T1">Masrekah</text:span></text:p>
          <text:p text:style-name="P2"><text:span text:style-name="T2">1Ch 1:4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5" draw:text-style-name="P1" draw:layer="layout" draw:type="curve" svg:x1="140.113cm" svg:y1="73.641cm" svg:x2="144.296cm" svg:y2="75.773cm" draw:start-shape="id197" draw:start-glue-point="2" draw:end-shape="id136" draw:end-glue-point="0" svg:d="M140113 73641c0 534 1046 1067 2092 1067 1045 0 2091 533 2091 1065" svg:viewBox="0 0 4184 2133">
          <text:p/>
        </draw:connector>
        <draw:custom-shape draw:style-name="gr64" draw:text-style-name="P23" xml:id="id198" draw:id="id198" draw:layer="layout" svg:width="3.048cm" svg:height="2.54cm" svg:x="138.599cm" svg:y="75.811cm">
          <text:p text:style-name="P2"><text:span text:style-name="T1">Rehoboth</text:span></text:p>
          <text:p text:style-name="P2"><text:span text:style-name="T2">1Ch 1:4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5" draw:text-style-name="P1" draw:layer="layout" draw:type="curve" svg:x1="140.123cm" svg:y1="78.351cm" svg:x2="144.297cm" svg:y2="79.774cm" draw:start-shape="id198" draw:start-glue-point="2" draw:end-shape="id137" draw:end-glue-point="0" svg:d="M140123 78351c0 356 1044 712 2087 712 1044 0 2087 356 2087 711" svg:viewBox="0 0 4175 1424">
          <text:p/>
        </draw:connector>
        <draw:custom-shape draw:style-name="gr67" draw:text-style-name="P20" xml:id="id193" draw:id="id193" draw:layer="layout" svg:width="3.546cm" svg:height="2.945cm" svg:x="138.369cm" svg:y="75.6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1" draw:text-style-name="P20" xml:id="id199" draw:id="id199" draw:layer="layout" svg:width="10.478cm" svg:height="6.985cm" svg:x="152.417cm" svg:y="53.801cm">
          <text:p text:style-name="P19"><text:span text:style-name="T18">Other than the name there is no clear connection between this Beor and the father of Balaam. Balaam the son of Beor was from </text:span><text:span text:style-name="T19">Pethor (an unknown city next to likely the Euphrates river) of Mesopotamia (Gen 24:10, </text:span><text:span text:style-name="T18">Num 22:5, Deu 23:4, Jdg 3:8,10, 1Ch 19:6, Psa 60:1 “Aram-naharaim”) and Aram (Syria) in the “mountains of the east” (Num 23:7). Haran is situate in the same region (where Terah the father of Abraham died Gen 11:32). Nahor Abraham’s brother lived in the same region (Gen 22:23, 24:10). It’s roughly both east and north of the Euphrates river and west of the Habor river. Evidently, the messengers and princes of Balak and Balaam traveled very far as there are roughly 400 miles from Mesopotamia to Moab as the crow fl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8" draw:text-style-name="P24" draw:layer="layout" draw:type="curve" svg:x1="152.417cm" svg:y1="57.293cm" svg:x2="146.061cm" svg:y2="55.313cm" draw:start-shape="id199" draw:start-glue-point="3" draw:end-shape="id200" draw:end-glue-point="1" svg:d="M152417 57293c-4765 0-1588-1980-6356-1980" svg:viewBox="0 0 6357 1981">
          <text:p/>
        </draw:connector>
        <draw:custom-shape draw:style-name="gr64" draw:text-style-name="P23" xml:id="id201" draw:id="id201" draw:layer="layout" svg:width="3.048cm" svg:height="2.54cm" svg:x="142.773cm" svg:y="90.948cm">
          <text:p text:style-name="P2"><text:span text:style-name="T1">Pai</text:span></text:p>
          <text:p text:style-name="P2"><text:span text:style-name="T2">1Ch 1:50</text:span></text:p>
          <text:p text:style-name="P2"><text:span text:style-name="T7">Pau</text:span></text:p>
          <text:p text:style-name="P2"><text:span text:style-name="T2">Gen 36:3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5" draw:text-style-name="P1" draw:layer="layout" draw:type="curve" svg:x1="144.297cm" svg:y1="90.948cm" svg:x2="144.299cm" svg:y2="90.014cm" draw:start-shape="id201" draw:start-glue-point="0" draw:end-shape="id140" draw:end-glue-point="2" svg:d="M144297 90948c0-233 1-466 1-466 1 0 1-234 1-468" svg:viewBox="0 0 3 935">
          <text:p/>
        </draw:connector>
        <draw:custom-shape draw:style-name="gr72" draw:text-style-name="P26" xml:id="id202" draw:id="id202" draw:layer="layout" svg:width="11.471cm" svg:height="15.205cm" svg:x="80.792cm" svg:y="131.565cm">
          <text:p text:style-name="P25"><text:span text:style-name="T20">1Ch 1:51-54</text:span></text:p>
          <text:p text:style-name="P25"><text:span text:style-name="T20">Gen 36:40-43</text:span></text:p>
          <text:p text:style-name="P25"><text:span text:style-name="T20">The dukes of Edom that came of Esa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line" svg:x1="86.42cm" svg:y1="33.47cm" svg:x2="86.444cm" svg:y2="41.536cm" draw:start-shape="id16" draw:start-glue-point="2" draw:end-shape="id60" draw:end-glue-point="0" svg:d="M86420 33470l24 8066" svg:viewBox="0 0 25 8067">
          <text:p/>
        </draw:connector>
        <draw:custom-shape draw:style-name="gr73" draw:text-style-name="P26" draw:layer="layout" svg:width="35.772cm" svg:height="21.682cm" svg:x="7.66cm" svg:y="109.94cm">
          <text:p text:style-name="P25"><text:span text:style-name="T20">1Ch 1:38-42</text:span></text:p>
          <text:p text:style-name="P25"><text:span text:style-name="T20">Sons of Seir (the Horite Gen 36: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draw:line-skew="-4.03cm" svg:x1="86.496cm" svg:y1="119.441cm" svg:x2="86.527cm" svg:y2="131.565cm" draw:start-shape="id117" draw:start-glue-point="2" draw:end-shape="id202" draw:end-glue-point="0" svg:d="M86496 119441c0 3048 31-3014 31 12124" svg:viewBox="0 0 32 12125">
          <text:p/>
        </draw:connector>
        <draw:custom-shape draw:style-name="gr74" draw:text-style-name="P26" draw:layer="layout" svg:width="14.605cm" svg:height="44.132cm" svg:x="137.27cm" svg:y="49.991cm">
          <text:p text:style-name="P25"><text:span text:style-name="T20">1Ch 1:43-50</text:span></text:p>
          <text:p text:style-name="P25"><text:span text:style-name="T20">Gen 36:31-39</text:span></text:p>
          <text:p text:style-name="P25"><text:span text:style-name="T20">Kings that reigned in the land of Edom before any king reigned over the children of Isra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 draw:text-style-name="P28" draw:layer="layout" svg:width="3.329cm" svg:height="5.908cm" svg:x="51.943cm" svg:y="61.468cm">
          <text:p text:style-name="P27"><text:span text:style-name="T21">Jerusalem</text:span></text:p>
          <text:p text:style-name="P27"><text:span text:style-name="T22">Jdg 19:10</text:span></text:p>
          <text:p text:style-name="P27"><text:span text:style-name="T22">1Ch 1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 draw:text-style-name="P28" draw:layer="layout" svg:width="43.888cm" svg:height="4.007cm" svg:x="88.252cm" svg:y="64.419cm">
          <text:p text:style-name="P27"><text:span text:style-name="T18">Gen 10:30</text:span></text:p>
          <text:p text:style-name="P27"><text:span text:style-name="T18">And their dwelling was from Mesha</text:span><text:span text:style-name="T23">H4852</text:span><text:span text:style-name="T18">, as thou goest unto Sephar</text:span><text:span text:style-name="T23">H5611</text:span><text:span text:style-name="T18"> a mount of the east</text:span><text:span text:style-name="T23">H6924</text:span><text:span text:style-name="T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 draw:text-style-name="P22" draw:layer="layout" svg:width="9.272cm" svg:height="2.87cm" svg:x="91.501cm" svg:y="45.222cm">
          <text:p text:style-name="P21"><text:span text:style-name="T24">Aram</text:span><text:span text:style-name="T23">H758</text:span></text:p>
          <text:p text:style-name="P21"><text:span text:style-name="T24">Syria</text:span><text:span text:style-name="T18">(</text:span><text:span text:style-name="T24">ns</text:span><text:span text:style-name="T18">)</text:span><text:span text:style-name="T23">H758</text:span><text:span text:style-name="T18"> Jdg 10:6, 2Sa 8:5</text:span></text:p>
          <text:p text:style-name="P21"><text:span text:style-name="T24">Syria-damascus</text:span><text:span text:style-name="T23">H758 H1834</text:span><text:span text:style-name="T18"> 1Ch 18:6</text:span></text:p>
          <text:p text:style-name="P21"><text:span text:style-name="T24">Syria-maachah</text:span><text:span text:style-name="T23">H758 H46 </text:span><text:span text:style-name="T25">1Ch 19: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9" draw:id="id49" draw:layer="layout" svg:width="3.048cm" svg:height="2.54cm" svg:x="84.936cm" svg:y="48.54cm">
          <text:p text:style-name="P2"><text:span text:style-name="T1">Cainan</text:span></text:p>
          <text:p text:style-name="P2"><text:span text:style-name="T2">Luk 3:3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9" draw:text-style-name="P1" draw:layer="layout" draw:type="curve" svg:x1="86.46cm" svg:y1="47.94cm" svg:x2="86.46cm" svg:y2="48.54cm" draw:start-shape="id63" draw:start-glue-point="2" draw:end-shape="id49" draw:end-glue-point="0" svg:d="M86460 47940v600" svg:viewBox="0 0 1 601">
          <text:p/>
        </draw:connector>
        <draw:custom-shape draw:style-name="gr4" draw:text-style-name="P3" xml:id="id203" draw:id="id203" draw:layer="layout" svg:width="3.048cm" svg:height="2.54cm" svg:x="71.755cm" svg:y="79.195cm">
          <text:p text:style-name="P2"><text:span text:style-name="T1">Nahor</text:span></text:p>
          <text:p text:style-name="P2"><text:span text:style-name="T8">Gen 11: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04" draw:id="id204" draw:layer="layout" svg:width="3.048cm" svg:height="2.54cm" svg:x="97.345cm" svg:y="79.178cm">
          <text:p text:style-name="P2"><text:span text:style-name="T1">Haran</text:span></text:p>
          <text:p text:style-name="P2"><text:span text:style-name="T8">Gen 11:26,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6.477cm" svg:y1="77.142cm" svg:x2="73.279cm" svg:y2="79.195cm" draw:start-shape="id90" draw:start-glue-point="2" draw:end-shape="id203" draw:end-glue-point="0" svg:d="M86477 77142c0 1540-13198 514-13198 2053" svg:viewBox="0 0 13199 2054">
          <text:p/>
        </draw:connector>
        <draw:connector draw:style-name="gr1" draw:text-style-name="P1" draw:layer="layout" draw:type="curve" svg:x1="86.477cm" svg:y1="77.142cm" svg:x2="98.869cm" svg:y2="79.178cm" draw:start-shape="id90" draw:start-glue-point="2" draw:end-shape="id204" draw:end-glue-point="0" svg:d="M86477 77142c0 1528 12392 511 12392 2036" svg:viewBox="0 0 12393 2037">
          <text:p/>
        </draw:connector>
        <draw:custom-shape draw:style-name="gr30" draw:text-style-name="P12" xml:id="id205" draw:id="id205" draw:layer="layout" svg:width="3.048cm" svg:height="2.54cm" svg:x="97.353cm" svg:y="82.995cm">
          <text:p text:style-name="P2"><text:span text:style-name="T1">Milcah</text:span></text:p>
          <text:p text:style-name="P2"><text:span text:style-name="T2">Gen 11: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12" xml:id="id206" draw:id="id206" draw:layer="layout" svg:width="3.048cm" svg:height="2.54cm" svg:x="101.053cm" svg:y="82.995cm">
          <text:p text:style-name="P2"><text:span text:style-name="T1">Iscah</text:span></text:p>
          <text:p text:style-name="P2"><text:span text:style-name="T2">Gen 11: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98.869cm" svg:y1="81.718cm" svg:x2="98.877cm" svg:y2="82.995cm" draw:start-shape="id204" draw:start-glue-point="2" draw:end-shape="id205" draw:end-glue-point="0" svg:d="M98869 81718c0 958 8 320 8 1277" svg:viewBox="0 0 9 1278">
          <text:p/>
        </draw:connector>
        <draw:connector draw:style-name="gr1" draw:text-style-name="P1" draw:layer="layout" draw:type="curve" svg:x1="102.577cm" svg:y1="82.995cm" svg:x2="98.869cm" svg:y2="81.718cm" draw:start-shape="id206" draw:start-glue-point="0" draw:end-shape="id204" draw:end-glue-point="2" svg:d="M102577 82995c0-957-3708-319-3708-1277" svg:viewBox="0 0 3709 1278">
          <text:p/>
        </draw:connector>
        <draw:custom-shape draw:style-name="gr30" draw:text-style-name="P12" xml:id="id207" draw:id="id207" draw:layer="layout" svg:width="3.048cm" svg:height="2.54cm" svg:x="98.443cm" svg:y="105.895cm">
          <text:p text:style-name="P2"><text:span text:style-name="T1">Sarai</text:span></text:p>
          <text:p text:style-name="P2"><text:span text:style-name="T2">Gen 11:29</text:span></text:p>
          <text:p text:style-name="P4"><text:span text:style-name="T3">Sarah</text:span></text:p>
          <text:p text:style-name="P4"><text:span text:style-name="T2">G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9" draw:text-style-name="P1" draw:layer="layout" draw:type="curve" svg:x1="98.443cm" svg:y1="107.165cm" svg:x2="88.001cm" svg:y2="107.168cm" draw:start-shape="id207" draw:start-glue-point="3" draw:end-shape="id91" draw:end-glue-point="1" svg:d="M98443 107165c-7830 0-2609 3-10442 3" svg:viewBox="0 0 10443 4">
          <text:p/>
        </draw:connector>
        <draw:custom-shape draw:style-name="gr4" draw:text-style-name="P3" xml:id="id208" draw:id="id208" draw:layer="layout" svg:width="3.048cm" svg:height="2.54cm" svg:x="105.824cm" svg:y="82.991cm">
          <text:p text:style-name="P2"><text:span text:style-name="T1">Lot</text:span></text:p>
          <text:p text:style-name="P2"><text:span text:style-name="T8">Gen 11:2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107.348cm" svg:y1="82.991cm" svg:x2="98.869cm" svg:y2="81.718cm" draw:start-shape="id208" draw:start-glue-point="0" draw:end-shape="id204" draw:end-glue-point="2" svg:d="M107348 82991c0-954-8479-318-8479-1273" svg:viewBox="0 0 8480 1274">
          <text:p/>
        </draw:connector>
        <draw:custom-shape draw:style-name="gr30" draw:text-style-name="P12" xml:id="id210" draw:id="id210" draw:layer="layout" svg:width="3.048cm" svg:height="2.54cm" svg:x="99.925cm" svg:y="88.695cm">
          <text:p text:style-name="P2"><text:span text:style-name="T1">Firstborn daughter</text:span></text:p>
          <text:p text:style-name="P2"><text:span text:style-name="T2">Gen 19:3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8" draw:text-style-name="P12" xml:id="id213" draw:id="id213" draw:layer="layout" svg:width="3.181cm" svg:height="2.54cm" svg:x="112.792cm" svg:y="88.695cm">
          <text:p text:style-name="P2"><text:span text:style-name="T1">Secondborn daughter</text:span></text:p>
          <text:p text:style-name="P2"><text:span text:style-name="T2">Gen 19:3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12" xml:id="id209" draw:id="id209" draw:layer="layout" svg:width="3.048cm" svg:height="2.54cm" svg:x="111.053cm" svg:y="82.995cm">
          <text:p text:style-name="P2"><text:span text:style-name="T1">Lot’s wife</text:span></text:p>
          <text:p text:style-name="P2"><text:span text:style-name="T2">Gen 19: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11" draw:id="id211" draw:layer="layout" svg:width="3.048cm" svg:height="2.54cm" svg:x="96.043cm" svg:y="88.691cm">
          <text:p text:style-name="P2"><text:span text:style-name="T1">Son in law</text:span></text:p>
          <text:p text:style-name="P2"><text:span text:style-name="T8">Gen 19: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12" draw:id="id212" draw:layer="layout" svg:width="3.048cm" svg:height="2.54cm" svg:x="116.843cm" svg:y="88.691cm">
          <text:p text:style-name="P4"><text:span text:style-name="T1">Son in law</text:span></text:p>
          <text:p text:style-name="P4"><text:span text:style-name="T26">Gen 19: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9" draw:text-style-name="P1" draw:layer="layout" draw:type="curve" svg:x1="108.872cm" svg:y1="84.261cm" svg:x2="111.053cm" svg:y2="84.265cm" draw:start-shape="id208" draw:start-glue-point="1" draw:end-shape="id209" draw:end-glue-point="3" svg:d="M108872 84261c1636 0 546 4 2181 4" svg:viewBox="0 0 2182 5">
          <text:p/>
        </draw:connector>
        <draw:connector draw:style-name="gr29" draw:text-style-name="P1" draw:layer="layout" draw:type="curve" svg:x1="99.925cm" svg:y1="89.965cm" svg:x2="99.091cm" svg:y2="89.961cm" draw:start-shape="id210" draw:start-glue-point="3" draw:end-shape="id211" draw:end-glue-point="1" svg:d="M99925 89965c-624 0-207-4-834-4" svg:viewBox="0 0 835 5">
          <text:p/>
        </draw:connector>
        <draw:connector draw:style-name="gr29" draw:text-style-name="P1" draw:layer="layout" draw:type="curve" svg:x1="116.843cm" svg:y1="89.961cm" svg:x2="115.973cm" svg:y2="89.965cm" draw:start-shape="id212" draw:start-glue-point="3" draw:end-shape="id213" draw:end-glue-point="1" svg:d="M116843 89961c-652 0-218 4-870 4" svg:viewBox="0 0 871 5">
          <text:p/>
        </draw:connector>
        <draw:connector draw:style-name="gr1" draw:text-style-name="P1" draw:layer="layout" draw:type="curve" draw:line-skew="-0.881cm" svg:x1="107.348cm" svg:y1="85.531cm" svg:x2="114.382cm" svg:y2="88.695cm" draw:start-shape="id208" draw:start-glue-point="2" draw:end-shape="id213" draw:end-glue-point="0" svg:d="M107348 85531c0 1053 7034-529 7034 3164" svg:viewBox="0 0 7035 3165">
          <text:p/>
        </draw:connector>
        <draw:connector draw:style-name="gr1" draw:text-style-name="P1" draw:layer="layout" draw:type="curve" draw:line-skew="-0.917cm" svg:x1="101.449cm" svg:y1="88.695cm" svg:x2="107.348cm" svg:y2="85.531cm" draw:start-shape="id210" draw:start-glue-point="0" draw:end-shape="id208" draw:end-glue-point="2" svg:d="M101449 88695c0-3747 5899-2165 5899-3164" svg:viewBox="0 0 5900 3165">
          <text:p/>
        </draw:connector>
        <draw:custom-shape draw:style-name="gr4" draw:text-style-name="P3" xml:id="id215" draw:id="id215" draw:layer="layout" svg:width="3.048cm" svg:height="2.54cm" svg:x="103.725cm" svg:y="93.291cm">
          <text:p text:style-name="P2"><text:span text:style-name="T1">Moab</text:span></text:p>
          <text:p text:style-name="P2"><text:span text:style-name="T8">Gen 19:3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17" draw:id="id217" draw:layer="layout" svg:width="3.048cm" svg:height="2.54cm" svg:x="108.524cm" svg:y="93.291cm">
          <text:p text:style-name="P2"><text:span text:style-name="T1">Ben-ammi</text:span></text:p>
          <text:p text:style-name="P2"><text:span text:style-name="T8">Gen 19:3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104.399cm" svg:y1="87.113cm" svg:x2="105.249cm" svg:y2="93.291cm" draw:start-shape="id214" draw:start-glue-point="0" draw:end-shape="id215" draw:end-glue-point="0" svg:d="M104399 87113c0 6810 850 3721 850 6178" svg:viewBox="0 0 851 6179">
          <text:p/>
        </draw:connector>
        <draw:connector draw:style-name="gr1" draw:text-style-name="P1" draw:layer="layout" draw:type="curve" svg:x1="110.832cm" svg:y1="87.113cm" svg:x2="110.048cm" svg:y2="93.291cm" draw:start-shape="id216" draw:start-glue-point="0" draw:end-shape="id217" draw:end-glue-point="0" svg:d="M110832 87113c0 6810-784 3721-784 6178" svg:viewBox="0 0 785 6179">
          <text:p/>
        </draw:connector>
        <draw:custom-shape draw:style-name="gr9" draw:text-style-name="P7" xml:id="id219" draw:id="id219" draw:layer="layout" svg:width="3.048cm" svg:height="2.54cm" svg:x="103.728cm" svg:y="97.372cm">
          <text:p text:style-name="P2"><text:span text:style-name="T1">Moabites</text:span></text:p>
          <text:p text:style-name="P2"><text:span text:style-name="T2">Gen 19:3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9" draw:text-style-name="P7" xml:id="id218" draw:id="id218" draw:layer="layout" svg:width="3.123cm" svg:height="2.54cm" svg:x="108.491cm" svg:y="97.347cm">
          <text:p text:style-name="P2"><text:span text:style-name="T1">Ammonites</text:span></text:p>
          <text:p text:style-name="P2"><text:span text:style-name="T2">Gen 19: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8" draw:text-style-name="P1" draw:layer="layout" draw:type="curve" svg:x1="110.048cm" svg:y1="95.831cm" svg:x2="110.052cm" svg:y2="97.347cm" draw:start-shape="id217" draw:start-glue-point="2" draw:end-shape="id218" draw:end-glue-point="0" svg:d="M110048 95831c0 1138 4 381 4 1516" svg:viewBox="0 0 5 1517">
          <text:p/>
        </draw:connector>
        <draw:connector draw:style-name="gr8" draw:text-style-name="P1" draw:layer="layout" draw:type="curve" svg:x1="105.249cm" svg:y1="95.831cm" svg:x2="105.252cm" svg:y2="97.372cm" draw:start-shape="id215" draw:start-glue-point="2" draw:end-shape="id219" draw:end-glue-point="0" svg:d="M105249 95831c0 1156 3 386 3 1541" svg:viewBox="0 0 4 1542">
          <text:p/>
        </draw:connector>
        <draw:connector draw:style-name="gr29" draw:text-style-name="P1" xml:id="id216" draw:id="id216" draw:layer="layout" draw:type="curve" svg:x1="108.872cm" svg:y1="84.261cm" svg:x2="112.792cm" svg:y2="89.965cm" draw:start-shape="id208" draw:start-glue-point="1" draw:end-shape="id213" draw:end-glue-point="3" svg:d="M108872 84261c2940 0 980 5704 3920 5704" svg:viewBox="0 0 3921 5705">
          <text:p/>
        </draw:connector>
        <draw:connector draw:style-name="gr29" draw:text-style-name="P1" xml:id="id214" draw:id="id214" draw:layer="layout" draw:type="curve" svg:x1="102.973cm" svg:y1="89.965cm" svg:x2="105.824cm" svg:y2="84.261cm" draw:start-shape="id210" draw:start-glue-point="1" draw:end-shape="id208" draw:end-glue-point="3" svg:d="M102973 89965c2139 0 714-5704 2851-5704" svg:viewBox="0 0 2852 5705">
          <text:p/>
        </draw:connector>
        <draw:custom-shape draw:style-name="gr4" draw:text-style-name="P3" xml:id="id220" draw:id="id220" draw:layer="layout" svg:width="3.048cm" svg:height="2.54cm" svg:x="62.555cm" svg:y="86.495cm">
          <text:p text:style-name="P2"><text:span text:style-name="T1">Kemuel</text:span></text:p>
          <text:p text:style-name="P2"><text:span text:style-name="T8">Gen 22: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9" draw:id="id229" draw:layer="layout" svg:width="3.048cm" svg:height="2.54cm" svg:x="66.255cm" svg:y="86.495cm">
          <text:p text:style-name="P2"><text:span text:style-name="T1">Chesed</text:span></text:p>
          <text:p text:style-name="P2"><text:span text:style-name="T8">Gen 22: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3" draw:id="id223" draw:layer="layout" svg:width="3.048cm" svg:height="2.54cm" svg:x="70.155cm" svg:y="86.495cm">
          <text:p text:style-name="P2"><text:span text:style-name="T1">Hazo</text:span></text:p>
          <text:p text:style-name="P2"><text:span text:style-name="T8">Gen 22: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4" draw:id="id224" draw:layer="layout" svg:width="3.048cm" svg:height="2.54cm" svg:x="74.055cm" svg:y="86.495cm">
          <text:p text:style-name="P2"><text:span text:style-name="T1">Pildash</text:span></text:p>
          <text:p text:style-name="P2"><text:span text:style-name="T8">Gen 22: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5" draw:id="id225" draw:layer="layout" svg:width="3.048cm" svg:height="2.54cm" svg:x="77.955cm" svg:y="86.495cm">
          <text:p text:style-name="P2"><text:span text:style-name="T1">Jidlaph</text:span></text:p>
          <text:p text:style-name="P2"><text:span text:style-name="T8">Gen 22: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30" draw:id="id230" draw:layer="layout" svg:width="3.048cm" svg:height="2.54cm" svg:x="55.355cm" svg:y="86.495cm">
          <text:p text:style-name="P2"><text:span text:style-name="T14">Huz</text:span></text:p>
          <text:p text:style-name="P2"><text:span text:style-name="T8">Gen 22: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8" draw:id="id228" draw:layer="layout" svg:width="3.048cm" svg:height="2.54cm" svg:x="58.955cm" svg:y="86.495cm">
          <text:p text:style-name="P2"><text:span text:style-name="T1">Buz</text:span></text:p>
          <text:p text:style-name="P2"><text:span text:style-name="T8">Gen 22: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1" draw:id="id221" draw:layer="layout" svg:width="3.048cm" svg:height="2.54cm" svg:x="62.555cm" svg:y="90.495cm">
          <text:p text:style-name="P2"><text:span text:style-name="T1">Aram</text:span></text:p>
          <text:p text:style-name="P2"><text:span text:style-name="T8">Gen 22: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6" draw:id="id226" draw:layer="layout" svg:width="3.048cm" svg:height="2.54cm" svg:x="81.855cm" svg:y="86.495cm">
          <text:p text:style-name="P2"><text:span text:style-name="T1">Bethuel</text:span></text:p>
          <text:p text:style-name="P2"><text:span text:style-name="T8">Gen 22: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12" xml:id="id227" draw:id="id227" draw:layer="layout" svg:width="3.048cm" svg:height="2.54cm" svg:x="81.853cm" svg:y="90.295cm">
          <text:p text:style-name="P2"><text:span text:style-name="T1">Rebekah</text:span></text:p>
          <text:p text:style-name="P2"><text:span text:style-name="T2">Gen 22:23</text:span></text:p>
          <text:p text:style-name="P4"><text:span text:style-name="T3">Rebecca</text:span></text:p>
          <text:p text:style-name="P4"><text:span text:style-name="T2">Rom 9: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64.079cm" svg:y1="89.035cm" svg:x2="64.079cm" svg:y2="90.495cm" draw:start-shape="id220" draw:start-glue-point="2" draw:end-shape="id221" draw:end-glue-point="0" svg:d="M64079 89035v1460" svg:viewBox="0 0 1 1461">
          <text:p/>
        </draw:connector>
        <draw:connector draw:style-name="gr1" draw:text-style-name="P1" draw:layer="layout" draw:type="curve" svg:x1="86.079cm" svg:y1="82.365cm" svg:x2="71.679cm" svg:y2="86.495cm" draw:start-shape="id222" draw:start-glue-point="0" draw:end-shape="id223" draw:end-glue-point="0" svg:d="M86079 82365c0 4560-14400 2495-14400 4130" svg:viewBox="0 0 14401 4131">
          <text:p/>
        </draw:connector>
        <draw:connector draw:style-name="gr1" draw:text-style-name="P1" draw:layer="layout" draw:type="curve" svg:x1="86.079cm" svg:y1="82.365cm" svg:x2="75.579cm" svg:y2="86.495cm" draw:start-shape="id222" draw:start-glue-point="0" draw:end-shape="id224" draw:end-glue-point="0" svg:d="M86079 82365c0 4560-10500 2495-10500 4130" svg:viewBox="0 0 10501 4131">
          <text:p/>
        </draw:connector>
        <draw:connector draw:style-name="gr1" draw:text-style-name="P1" draw:layer="layout" draw:type="curve" svg:x1="86.079cm" svg:y1="82.365cm" svg:x2="79.479cm" svg:y2="86.495cm" draw:start-shape="id222" draw:start-glue-point="0" draw:end-shape="id225" draw:end-glue-point="0" svg:d="M86079 82365c0 4560-6600 2495-6600 4130" svg:viewBox="0 0 6601 4131">
          <text:p/>
        </draw:connector>
        <draw:connector draw:style-name="gr1" draw:text-style-name="P1" draw:layer="layout" draw:type="curve" svg:x1="86.079cm" svg:y1="82.365cm" svg:x2="83.379cm" svg:y2="86.495cm" draw:start-shape="id222" draw:start-glue-point="0" draw:end-shape="id226" draw:end-glue-point="0" svg:d="M86079 82365c0 4560-2700 2495-2700 4130" svg:viewBox="0 0 2701 4131">
          <text:p/>
        </draw:connector>
        <draw:connector draw:style-name="gr1" draw:text-style-name="P1" draw:layer="layout" draw:type="curve" svg:x1="83.379cm" svg:y1="89.035cm" svg:x2="83.377cm" svg:y2="90.295cm" draw:start-shape="id226" draw:start-glue-point="2" draw:end-shape="id227" draw:end-glue-point="0" svg:d="M83379 89035c0 946-2 317-2 1260" svg:viewBox="0 0 3 1261">
          <text:p/>
        </draw:connector>
        <draw:connector draw:style-name="gr1" draw:text-style-name="P1" draw:layer="layout" draw:type="curve" svg:x1="86.079cm" svg:y1="82.365cm" svg:x2="64.079cm" svg:y2="86.495cm" draw:start-shape="id222" draw:start-glue-point="0" draw:end-shape="id220" draw:end-glue-point="0" svg:d="M86079 82365c0 4560-22000 2495-22000 4130" svg:viewBox="0 0 22001 4131">
          <text:p/>
        </draw:connector>
        <draw:connector draw:style-name="gr1" draw:text-style-name="P1" draw:layer="layout" draw:type="curve" svg:x1="86.079cm" svg:y1="82.365cm" svg:x2="60.479cm" svg:y2="86.495cm" draw:start-shape="id222" draw:start-glue-point="0" draw:end-shape="id228" draw:end-glue-point="0" svg:d="M86079 82365c0 4560-25600 2495-25600 4130" svg:viewBox="0 0 25601 4131">
          <text:p/>
        </draw:connector>
        <draw:connector draw:style-name="gr1" draw:text-style-name="P1" draw:layer="layout" draw:type="curve" svg:x1="86.079cm" svg:y1="82.365cm" svg:x2="67.779cm" svg:y2="86.495cm" draw:start-shape="id222" draw:start-glue-point="0" draw:end-shape="id229" draw:end-glue-point="0" svg:d="M86079 82365c0 4560-18300 2495-18300 4130" svg:viewBox="0 0 18301 4131">
          <text:p/>
        </draw:connector>
        <draw:connector draw:style-name="gr1" draw:text-style-name="P1" draw:layer="layout" draw:type="curve" svg:x1="38.19cm" svg:y1="80.518cm" svg:x2="38.198cm" svg:y2="81.795cm" svg:d="M38190 80518c0 958 8 320 8 1277" svg:viewBox="0 0 9 1278">
          <text:p/>
        </draw:connector>
        <draw:connector draw:style-name="gr1" draw:text-style-name="P1" draw:layer="layout" draw:type="curve" svg:x1="40.19cm" svg:y1="80.519cm" svg:x2="40.198cm" svg:y2="81.796cm" svg:d="M40190 80519c0 958 8 320 8 1277" svg:viewBox="0 0 9 1278">
          <text:p/>
        </draw:connector>
        <draw:connector draw:style-name="gr1" draw:text-style-name="P1" draw:layer="layout" draw:type="curve" svg:x1="42.19cm" svg:y1="80.52cm" svg:x2="42.198cm" svg:y2="81.797cm" svg:d="M42190 80520c0 958 8 320 8 1277" svg:viewBox="0 0 9 1278">
          <text:p/>
        </draw:connector>
        <draw:connector draw:style-name="gr1" draw:text-style-name="P1" draw:layer="layout" draw:type="curve" svg:x1="44.19cm" svg:y1="80.521cm" svg:x2="44.198cm" svg:y2="81.798cm" svg:d="M44190 80521c0 958 8 320 8 1277" svg:viewBox="0 0 9 1278">
          <text:p/>
        </draw:connector>
        <draw:connector draw:style-name="gr1" draw:text-style-name="P1" draw:layer="layout" draw:type="curve" svg:x1="86.079cm" svg:y1="82.365cm" svg:x2="56.879cm" svg:y2="86.495cm" draw:start-shape="id222" draw:start-glue-point="0" draw:end-shape="id230" draw:end-glue-point="0" svg:d="M86079 82365c0 4560-29200 2495-29200 4130" svg:viewBox="0 0 29201 4131">
          <text:p/>
        </draw:connector>
        <draw:connector draw:style-name="gr1" draw:text-style-name="P1" draw:layer="layout" draw:type="curve" svg:x1="38.19cm" svg:y1="78.218cm" svg:x2="38.198cm" svg:y2="79.495cm" svg:d="M38190 78218c0 958 8 320 8 1277" svg:viewBox="0 0 9 1278">
          <text:p/>
        </draw:connector>
        <draw:connector draw:style-name="gr1" draw:text-style-name="P1" draw:layer="layout" draw:type="curve" svg:x1="40.19cm" svg:y1="78.219cm" svg:x2="40.198cm" svg:y2="79.496cm" svg:d="M40190 78219c0 958 8 320 8 1277" svg:viewBox="0 0 9 1278">
          <text:p/>
        </draw:connector>
        <draw:connector draw:style-name="gr1" draw:text-style-name="P1" draw:layer="layout" draw:type="curve" svg:x1="42.19cm" svg:y1="78.22cm" svg:x2="42.198cm" svg:y2="79.497cm" svg:d="M42190 78220c0 958 8 320 8 1277" svg:viewBox="0 0 9 1278">
          <text:p/>
        </draw:connector>
        <draw:connector draw:style-name="gr1" draw:text-style-name="P1" draw:layer="layout" draw:type="curve" svg:x1="44.19cm" svg:y1="78.221cm" svg:x2="44.198cm" svg:y2="79.498cm" svg:d="M44190 78221c0 958 8 320 8 1277" svg:viewBox="0 0 9 1278">
          <text:p/>
        </draw:connector>
        <draw:connector draw:style-name="gr1" draw:text-style-name="P1" draw:layer="layout" draw:type="curve" svg:x1="38.19cm" svg:y1="85.518cm" svg:x2="38.198cm" svg:y2="86.795cm" svg:d="M38190 85518c0 958 8 320 8 1277" svg:viewBox="0 0 9 1278">
          <text:p/>
        </draw:connector>
        <draw:connector draw:style-name="gr1" draw:text-style-name="P1" draw:layer="layout" draw:type="curve" svg:x1="40.19cm" svg:y1="85.519cm" svg:x2="40.198cm" svg:y2="86.796cm" svg:d="M40190 85519c0 958 8 320 8 1277" svg:viewBox="0 0 9 1278">
          <text:p/>
        </draw:connector>
        <draw:connector draw:style-name="gr1" draw:text-style-name="P1" draw:layer="layout" draw:type="curve" svg:x1="42.19cm" svg:y1="85.52cm" svg:x2="42.198cm" svg:y2="86.797cm" svg:d="M42190 85520c0 958 8 320 8 1277" svg:viewBox="0 0 9 1278">
          <text:p/>
        </draw:connector>
        <draw:connector draw:style-name="gr1" draw:text-style-name="P1" draw:layer="layout" draw:type="curve" svg:x1="44.19cm" svg:y1="85.521cm" svg:x2="44.198cm" svg:y2="86.798cm" svg:d="M44190 85521c0 958 8 320 8 1277" svg:viewBox="0 0 9 1278">
          <text:p/>
        </draw:connector>
        <draw:connector draw:style-name="gr1" draw:text-style-name="P1" draw:layer="layout" draw:type="curve" svg:x1="38.19cm" svg:y1="83.218cm" svg:x2="38.198cm" svg:y2="84.495cm" svg:d="M38190 83218c0 958 8 320 8 1277" svg:viewBox="0 0 9 1278">
          <text:p/>
        </draw:connector>
        <draw:connector draw:style-name="gr1" draw:text-style-name="P1" draw:layer="layout" draw:type="curve" svg:x1="40.19cm" svg:y1="83.219cm" svg:x2="40.198cm" svg:y2="84.496cm" svg:d="M40190 83219c0 958 8 320 8 1277" svg:viewBox="0 0 9 1278">
          <text:p/>
        </draw:connector>
        <draw:connector draw:style-name="gr1" draw:text-style-name="P1" draw:layer="layout" draw:type="curve" svg:x1="42.19cm" svg:y1="83.22cm" svg:x2="42.198cm" svg:y2="84.497cm" svg:d="M42190 83220c0 958 8 320 8 1277" svg:viewBox="0 0 9 1278">
          <text:p/>
        </draw:connector>
        <draw:connector draw:style-name="gr1" draw:text-style-name="P1" draw:layer="layout" draw:type="curve" svg:x1="44.19cm" svg:y1="83.221cm" svg:x2="44.198cm" svg:y2="84.498cm" svg:d="M44190 83221c0 958 8 320 8 1277" svg:viewBox="0 0 9 1278">
          <text:p/>
        </draw:connector>
        <draw:connector draw:style-name="gr1" draw:text-style-name="P1" draw:layer="layout" draw:type="curve" svg:x1="30.19cm" svg:y1="80.518cm" svg:x2="30.198cm" svg:y2="81.795cm" svg:d="M30190 80518c0 958 8 320 8 1277" svg:viewBox="0 0 9 1278">
          <text:p/>
        </draw:connector>
        <draw:connector draw:style-name="gr1" draw:text-style-name="P1" draw:layer="layout" draw:type="curve" svg:x1="32.19cm" svg:y1="80.519cm" svg:x2="32.198cm" svg:y2="81.796cm" svg:d="M32190 80519c0 958 8 320 8 1277" svg:viewBox="0 0 9 1278">
          <text:p/>
        </draw:connector>
        <draw:connector draw:style-name="gr1" draw:text-style-name="P1" draw:layer="layout" draw:type="curve" svg:x1="34.19cm" svg:y1="80.52cm" svg:x2="34.198cm" svg:y2="81.797cm" svg:d="M34190 80520c0 958 8 320 8 1277" svg:viewBox="0 0 9 1278">
          <text:p/>
        </draw:connector>
        <draw:connector draw:style-name="gr1" draw:text-style-name="P1" draw:layer="layout" draw:type="curve" svg:x1="36.19cm" svg:y1="80.521cm" svg:x2="36.198cm" svg:y2="81.798cm" svg:d="M36190 80521c0 958 8 320 8 1277" svg:viewBox="0 0 9 1278">
          <text:p/>
        </draw:connector>
        <draw:connector draw:style-name="gr1" draw:text-style-name="P1" draw:layer="layout" draw:type="curve" svg:x1="30.19cm" svg:y1="78.218cm" svg:x2="30.198cm" svg:y2="79.495cm" svg:d="M30190 78218c0 958 8 320 8 1277" svg:viewBox="0 0 9 1278">
          <text:p/>
        </draw:connector>
        <draw:connector draw:style-name="gr1" draw:text-style-name="P1" draw:layer="layout" draw:type="curve" svg:x1="32.19cm" svg:y1="78.219cm" svg:x2="32.198cm" svg:y2="79.496cm" svg:d="M32190 78219c0 958 8 320 8 1277" svg:viewBox="0 0 9 1278">
          <text:p/>
        </draw:connector>
        <draw:connector draw:style-name="gr1" draw:text-style-name="P1" draw:layer="layout" draw:type="curve" svg:x1="34.19cm" svg:y1="78.22cm" svg:x2="34.198cm" svg:y2="79.497cm" svg:d="M34190 78220c0 958 8 320 8 1277" svg:viewBox="0 0 9 1278">
          <text:p/>
        </draw:connector>
        <draw:connector draw:style-name="gr1" draw:text-style-name="P1" draw:layer="layout" draw:type="curve" svg:x1="36.19cm" svg:y1="78.221cm" svg:x2="36.198cm" svg:y2="79.498cm" svg:d="M36190 78221c0 958 8 320 8 1277" svg:viewBox="0 0 9 1278">
          <text:p/>
        </draw:connector>
        <draw:connector draw:style-name="gr1" draw:text-style-name="P1" draw:layer="layout" draw:type="curve" svg:x1="30.19cm" svg:y1="85.518cm" svg:x2="30.198cm" svg:y2="86.795cm" svg:d="M30190 85518c0 958 8 320 8 1277" svg:viewBox="0 0 9 1278">
          <text:p/>
        </draw:connector>
        <draw:connector draw:style-name="gr1" draw:text-style-name="P1" draw:layer="layout" draw:type="curve" svg:x1="32.19cm" svg:y1="85.519cm" svg:x2="32.198cm" svg:y2="86.796cm" svg:d="M32190 85519c0 958 8 320 8 1277" svg:viewBox="0 0 9 1278">
          <text:p/>
        </draw:connector>
        <draw:connector draw:style-name="gr1" draw:text-style-name="P1" draw:layer="layout" draw:type="curve" svg:x1="34.19cm" svg:y1="85.52cm" svg:x2="34.198cm" svg:y2="86.797cm" svg:d="M34190 85520c0 958 8 320 8 1277" svg:viewBox="0 0 9 1278">
          <text:p/>
        </draw:connector>
        <draw:connector draw:style-name="gr1" draw:text-style-name="P1" draw:layer="layout" draw:type="curve" svg:x1="36.19cm" svg:y1="85.521cm" svg:x2="36.198cm" svg:y2="86.798cm" svg:d="M36190 85521c0 958 8 320 8 1277" svg:viewBox="0 0 9 1278">
          <text:p/>
        </draw:connector>
        <draw:connector draw:style-name="gr1" draw:text-style-name="P1" draw:layer="layout" draw:type="curve" svg:x1="30.19cm" svg:y1="83.218cm" svg:x2="30.198cm" svg:y2="84.495cm" svg:d="M30190 83218c0 958 8 320 8 1277" svg:viewBox="0 0 9 1278">
          <text:p/>
        </draw:connector>
        <draw:connector draw:style-name="gr1" draw:text-style-name="P1" draw:layer="layout" draw:type="curve" svg:x1="32.19cm" svg:y1="83.219cm" svg:x2="32.198cm" svg:y2="84.496cm" svg:d="M32190 83219c0 958 8 320 8 1277" svg:viewBox="0 0 9 1278">
          <text:p/>
        </draw:connector>
        <draw:connector draw:style-name="gr1" draw:text-style-name="P1" draw:layer="layout" draw:type="curve" svg:x1="34.19cm" svg:y1="83.22cm" svg:x2="34.198cm" svg:y2="84.497cm" svg:d="M34190 83220c0 958 8 320 8 1277" svg:viewBox="0 0 9 1278">
          <text:p/>
        </draw:connector>
        <draw:connector draw:style-name="gr1" draw:text-style-name="P1" draw:layer="layout" draw:type="curve" svg:x1="36.19cm" svg:y1="83.221cm" svg:x2="36.198cm" svg:y2="84.498cm" svg:d="M36190 83221c0 958 8 320 8 1277" svg:viewBox="0 0 9 1278">
          <text:p/>
        </draw:connector>
        <draw:connector draw:style-name="gr1" draw:text-style-name="P1" draw:layer="layout" draw:type="curve" svg:x1="38.19cm" svg:y1="90.518cm" svg:x2="38.198cm" svg:y2="91.795cm" svg:d="M38190 90518c0 958 8 320 8 1277" svg:viewBox="0 0 9 1278">
          <text:p/>
        </draw:connector>
        <draw:connector draw:style-name="gr1" draw:text-style-name="P1" draw:layer="layout" draw:type="curve" svg:x1="40.19cm" svg:y1="90.519cm" svg:x2="40.198cm" svg:y2="91.796cm" svg:d="M40190 90519c0 958 8 320 8 1277" svg:viewBox="0 0 9 1278">
          <text:p/>
        </draw:connector>
        <draw:connector draw:style-name="gr1" draw:text-style-name="P1" draw:layer="layout" draw:type="curve" svg:x1="42.19cm" svg:y1="90.52cm" svg:x2="42.198cm" svg:y2="91.797cm" svg:d="M42190 90520c0 958 8 320 8 1277" svg:viewBox="0 0 9 1278">
          <text:p/>
        </draw:connector>
        <draw:connector draw:style-name="gr1" draw:text-style-name="P1" draw:layer="layout" draw:type="curve" svg:x1="44.19cm" svg:y1="90.521cm" svg:x2="44.198cm" svg:y2="91.798cm" svg:d="M44190 90521c0 958 8 320 8 1277" svg:viewBox="0 0 9 1278">
          <text:p/>
        </draw:connector>
        <draw:connector draw:style-name="gr1" draw:text-style-name="P1" draw:layer="layout" draw:type="curve" svg:x1="38.19cm" svg:y1="88.218cm" svg:x2="38.198cm" svg:y2="89.495cm" svg:d="M38190 88218c0 958 8 320 8 1277" svg:viewBox="0 0 9 1278">
          <text:p/>
        </draw:connector>
        <draw:connector draw:style-name="gr1" draw:text-style-name="P1" draw:layer="layout" draw:type="curve" svg:x1="40.19cm" svg:y1="88.219cm" svg:x2="40.198cm" svg:y2="89.496cm" svg:d="M40190 88219c0 958 8 320 8 1277" svg:viewBox="0 0 9 1278">
          <text:p/>
        </draw:connector>
        <draw:connector draw:style-name="gr1" draw:text-style-name="P1" draw:layer="layout" draw:type="curve" svg:x1="42.19cm" svg:y1="88.22cm" svg:x2="42.198cm" svg:y2="89.497cm" svg:d="M42190 88220c0 958 8 320 8 1277" svg:viewBox="0 0 9 1278">
          <text:p/>
        </draw:connector>
        <draw:connector draw:style-name="gr1" draw:text-style-name="P1" draw:layer="layout" draw:type="curve" svg:x1="44.19cm" svg:y1="88.221cm" svg:x2="44.198cm" svg:y2="89.498cm" svg:d="M44190 88221c0 958 8 320 8 1277" svg:viewBox="0 0 9 1278">
          <text:p/>
        </draw:connector>
        <draw:connector draw:style-name="gr1" draw:text-style-name="P1" draw:layer="layout" draw:type="curve" svg:x1="38.19cm" svg:y1="95.518cm" svg:x2="38.198cm" svg:y2="96.795cm" svg:d="M38190 95518c0 958 8 320 8 1277" svg:viewBox="0 0 9 1278">
          <text:p/>
        </draw:connector>
        <draw:connector draw:style-name="gr1" draw:text-style-name="P1" draw:layer="layout" draw:type="curve" svg:x1="40.19cm" svg:y1="95.519cm" svg:x2="40.198cm" svg:y2="96.796cm" svg:d="M40190 95519c0 958 8 320 8 1277" svg:viewBox="0 0 9 1278">
          <text:p/>
        </draw:connector>
        <draw:connector draw:style-name="gr1" draw:text-style-name="P1" draw:layer="layout" draw:type="curve" svg:x1="42.19cm" svg:y1="95.52cm" svg:x2="42.198cm" svg:y2="96.797cm" svg:d="M42190 95520c0 958 8 320 8 1277" svg:viewBox="0 0 9 1278">
          <text:p/>
        </draw:connector>
        <draw:connector draw:style-name="gr1" draw:text-style-name="P1" draw:layer="layout" draw:type="curve" svg:x1="44.19cm" svg:y1="95.521cm" svg:x2="44.198cm" svg:y2="96.798cm" svg:d="M44190 95521c0 958 8 320 8 1277" svg:viewBox="0 0 9 1278">
          <text:p/>
        </draw:connector>
        <draw:connector draw:style-name="gr1" draw:text-style-name="P1" draw:layer="layout" draw:type="curve" svg:x1="38.19cm" svg:y1="93.218cm" svg:x2="38.198cm" svg:y2="94.495cm" svg:d="M38190 93218c0 958 8 320 8 1277" svg:viewBox="0 0 9 1278">
          <text:p/>
        </draw:connector>
        <draw:connector draw:style-name="gr1" draw:text-style-name="P1" draw:layer="layout" draw:type="curve" svg:x1="40.19cm" svg:y1="93.219cm" svg:x2="40.198cm" svg:y2="94.496cm" svg:d="M40190 93219c0 958 8 320 8 1277" svg:viewBox="0 0 9 1278">
          <text:p/>
        </draw:connector>
        <draw:connector draw:style-name="gr1" draw:text-style-name="P1" draw:layer="layout" draw:type="curve" svg:x1="42.19cm" svg:y1="93.22cm" svg:x2="42.198cm" svg:y2="94.497cm" svg:d="M42190 93220c0 958 8 320 8 1277" svg:viewBox="0 0 9 1278">
          <text:p/>
        </draw:connector>
        <draw:connector draw:style-name="gr1" draw:text-style-name="P1" draw:layer="layout" draw:type="curve" svg:x1="44.19cm" svg:y1="93.221cm" svg:x2="44.198cm" svg:y2="94.498cm" svg:d="M44190 93221c0 958 8 320 8 1277" svg:viewBox="0 0 9 1278">
          <text:p/>
        </draw:connector>
        <draw:connector draw:style-name="gr1" draw:text-style-name="P1" draw:layer="layout" draw:type="curve" svg:x1="30.19cm" svg:y1="90.518cm" svg:x2="30.198cm" svg:y2="91.795cm" svg:d="M30190 90518c0 958 8 320 8 1277" svg:viewBox="0 0 9 1278">
          <text:p/>
        </draw:connector>
        <draw:connector draw:style-name="gr1" draw:text-style-name="P1" draw:layer="layout" draw:type="curve" svg:x1="32.19cm" svg:y1="90.519cm" svg:x2="32.198cm" svg:y2="91.796cm" svg:d="M32190 90519c0 958 8 320 8 1277" svg:viewBox="0 0 9 1278">
          <text:p/>
        </draw:connector>
        <draw:connector draw:style-name="gr1" draw:text-style-name="P1" draw:layer="layout" draw:type="curve" svg:x1="34.19cm" svg:y1="90.52cm" svg:x2="34.198cm" svg:y2="91.797cm" svg:d="M34190 90520c0 958 8 320 8 1277" svg:viewBox="0 0 9 1278">
          <text:p/>
        </draw:connector>
        <draw:connector draw:style-name="gr1" draw:text-style-name="P1" draw:layer="layout" draw:type="curve" svg:x1="36.19cm" svg:y1="90.521cm" svg:x2="36.198cm" svg:y2="91.798cm" svg:d="M36190 90521c0 958 8 320 8 1277" svg:viewBox="0 0 9 1278">
          <text:p/>
        </draw:connector>
        <draw:connector draw:style-name="gr1" draw:text-style-name="P1" draw:layer="layout" draw:type="curve" svg:x1="30.19cm" svg:y1="88.218cm" svg:x2="30.198cm" svg:y2="89.495cm" svg:d="M30190 88218c0 958 8 320 8 1277" svg:viewBox="0 0 9 1278">
          <text:p/>
        </draw:connector>
        <draw:connector draw:style-name="gr1" draw:text-style-name="P1" draw:layer="layout" draw:type="curve" svg:x1="32.19cm" svg:y1="88.219cm" svg:x2="32.198cm" svg:y2="89.496cm" svg:d="M32190 88219c0 958 8 320 8 1277" svg:viewBox="0 0 9 1278">
          <text:p/>
        </draw:connector>
        <draw:connector draw:style-name="gr1" draw:text-style-name="P1" draw:layer="layout" draw:type="curve" svg:x1="34.19cm" svg:y1="88.22cm" svg:x2="34.198cm" svg:y2="89.497cm" svg:d="M34190 88220c0 958 8 320 8 1277" svg:viewBox="0 0 9 1278">
          <text:p/>
        </draw:connector>
        <draw:connector draw:style-name="gr1" draw:text-style-name="P1" draw:layer="layout" draw:type="curve" svg:x1="36.19cm" svg:y1="88.221cm" svg:x2="36.198cm" svg:y2="89.498cm" svg:d="M36190 88221c0 958 8 320 8 1277" svg:viewBox="0 0 9 1278">
          <text:p/>
        </draw:connector>
        <draw:connector draw:style-name="gr1" draw:text-style-name="P1" draw:layer="layout" draw:type="curve" svg:x1="30.19cm" svg:y1="95.518cm" svg:x2="30.198cm" svg:y2="96.795cm" svg:d="M30190 95518c0 958 8 320 8 1277" svg:viewBox="0 0 9 1278">
          <text:p/>
        </draw:connector>
        <draw:connector draw:style-name="gr1" draw:text-style-name="P1" draw:layer="layout" draw:type="curve" svg:x1="32.19cm" svg:y1="95.519cm" svg:x2="32.198cm" svg:y2="96.796cm" svg:d="M32190 95519c0 958 8 320 8 1277" svg:viewBox="0 0 9 1278">
          <text:p/>
        </draw:connector>
        <draw:connector draw:style-name="gr1" draw:text-style-name="P1" draw:layer="layout" draw:type="curve" svg:x1="34.19cm" svg:y1="95.52cm" svg:x2="34.198cm" svg:y2="96.797cm" svg:d="M34190 95520c0 958 8 320 8 1277" svg:viewBox="0 0 9 1278">
          <text:p/>
        </draw:connector>
        <draw:connector draw:style-name="gr1" draw:text-style-name="P1" draw:layer="layout" draw:type="curve" svg:x1="36.19cm" svg:y1="95.521cm" svg:x2="36.198cm" svg:y2="96.798cm" svg:d="M36190 95521c0 958 8 320 8 1277" svg:viewBox="0 0 9 1278">
          <text:p/>
        </draw:connector>
        <draw:connector draw:style-name="gr1" draw:text-style-name="P1" draw:layer="layout" draw:type="curve" svg:x1="30.19cm" svg:y1="93.218cm" svg:x2="30.198cm" svg:y2="94.495cm" svg:d="M30190 93218c0 958 8 320 8 1277" svg:viewBox="0 0 9 1278">
          <text:p/>
        </draw:connector>
        <draw:connector draw:style-name="gr1" draw:text-style-name="P1" draw:layer="layout" draw:type="curve" svg:x1="32.19cm" svg:y1="93.219cm" svg:x2="32.198cm" svg:y2="94.496cm" svg:d="M32190 93219c0 958 8 320 8 1277" svg:viewBox="0 0 9 1278">
          <text:p/>
        </draw:connector>
        <draw:connector draw:style-name="gr1" draw:text-style-name="P1" draw:layer="layout" draw:type="curve" svg:x1="34.19cm" svg:y1="93.22cm" svg:x2="34.198cm" svg:y2="94.497cm" svg:d="M34190 93220c0 958 8 320 8 1277" svg:viewBox="0 0 9 1278">
          <text:p/>
        </draw:connector>
        <draw:connector draw:style-name="gr1" draw:text-style-name="P1" draw:layer="layout" draw:type="curve" svg:x1="36.19cm" svg:y1="93.221cm" svg:x2="36.198cm" svg:y2="94.498cm" svg:d="M36190 93221c0 958 8 320 8 1277" svg:viewBox="0 0 9 1278">
          <text:p/>
        </draw:connector>
        <draw:connector draw:style-name="gr29" draw:text-style-name="P1" xml:id="id222" draw:id="id222" draw:layer="layout" draw:type="curve" svg:x1="97.353cm" svg:y1="84.265cm" svg:x2="74.803cm" svg:y2="80.465cm" draw:start-shape="id205" draw:start-glue-point="3" draw:end-shape="id203" draw:end-glue-point="1" svg:d="M97353 84265c-16911 0-5636-3800-22550-3800" svg:viewBox="0 0 22551 3801">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ystem" style:font-pitch="variable"/>
    <style:font-face style:name="Gabriela Nerd Font" svg:font-family="'Gabriela Nerd Font'" style:font-adornments="Regular" style:font-pitch="variable"/>
    <style:font-face style:name="Gabriela Nerd Font1" svg:font-family="'Gabriela Nerd 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Gabriela Nerd Font" fo:font-family="'Gabriela Nerd Font'" style:font-style-name="Regular"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width="0.025cm" draw:marker-start-width="0.229cm" draw:marker-end-width="0.2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Gabriela Nerd Font" fo:font-family="'Gabriela Nerd Font'" style:font-style-name="Regular" style:font-pitch="variable" fo:font-size="1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Gabriela Nerd Font" fo:font-family="'Gabriela Nerd Font'" style:font-style-name="Regular" style:font-pitch="variable" fo:font-size="1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08cm" fo:margin-bottom="0.508cm" fo:margin-left="0.508cm" fo:margin-right="0.508cm" fo:page-width="254cm" fo:page-height="254cm" style:print-orientation="portrait"/>
    </style:page-layout>
    <style:style style:name="Mdp1" style:family="drawing-page">
      <style:drawing-page-properties draw:background-size="full"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1-29T07:30:44.577000000</meta:creation-date>
    <dc:date>2026-07-11T12:32:08.628218237</dc:date>
    <meta:editing-duration>P1DT14H45M31S</meta:editing-duration>
    <meta:editing-cycles>848</meta:editing-cycles>
    <meta:generator>LibreOffice/26.2.4.2$Linux_X86_64 LibreOffice_project/64a984c51f4702dbd3710b13428c673a2f1292e7</meta:generator>
    <meta:print-date>2025-06-13T22:00:40.382818700</meta:print-date>
    <meta:printed-by>PDF files</meta:printed-by>
    <dc:title>1 Chronicles 1 genealogy</dc:title>
    <meta:document-statistic meta:object-count="533"/>
  </office:meta>
</office:document-meta>
</file>