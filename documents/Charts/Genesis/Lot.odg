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1.ttf" manifest:media-type="application/x-font-ttf"/>
  <manifest:file-entry manifest:full-path="Fonts/Font_Gabriela_Nerd_Font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Gabriela Nerd Font1" svg:font-family="'Gabriela Nerd Font'" style:font-adornments="Regular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2.40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objectwithoutfill">
      <style:graphic-properties svg:stroke-width="0.1cm" svg:stroke-color="#ff0000" draw:marker-start-width="0.2cm" draw:marker-end-width="0.2cm" draw:fill="none" draw:textarea-vertical-align="middle" fo:padding-top="0.174cm" fo:padding-bottom="0.174cm" fo:padding-left="0.299cm" fo:padding-right="0.299cm" loext:decorative="fals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552cm" fo:min-width="2.25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86cm" fo:min-width="2.25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6.091cm" fo:min-width="11.24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ff0000" draw:fill="none" draw:textarea-vertical-align="middle" fo:padding-top="0.162cm" fo:padding-bottom="0.162cm" fo:padding-left="0.287cm" fo:padding-right="0.287cm" loext:decorative="false"/>
    </style:style>
    <style:style style:name="gr9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433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12" style:family="graphic" style:parent-style-name="standard">
      <style:graphic-properties svg:stroke-color="#729fcf" draw:fill="solid" draw:fill-color="#ffb66c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729fcf" draw:fill="solid" draw:fill-color="#ffb66c" draw:textarea-horizontal-align="justify" draw:textarea-vertical-align="middle" draw:auto-grow-height="false" fo:min-height="2.042cm" fo:min-width="2.37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1cm" svg:stroke-color="#ffb66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P1" style:family="paragraph">
      <style:paragraph-properties fo:text-align="center"/>
      <style:text-properties style:font-name="Gabriela Nerd Font" fo:font-size="12pt"/>
    </style:style>
    <style:style style:name="P2" style:family="paragraph">
      <style:paragraph-properties fo:text-align="center" style:writing-mode="lr-tb"/>
      <style:text-properties style:font-name="Gabriela Nerd Font"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Gabriela Nerd Font" fo:font-size="12pt"/>
    </style:style>
    <style:style style:name="P4" style:family="paragraph">
      <style:paragraph-properties fo:margin-left="0cm" fo:margin-right="0cm" fo:text-align="center" fo:text-indent="0cm"/>
      <style:text-properties style:font-name="Gabriela Nerd Font" fo:font-size="12pt"/>
    </style:style>
    <style:style style:name="P5" style:family="paragraph">
      <style:paragraph-properties fo:margin-left="0cm" fo:margin-right="0cm" fo:text-align="center" fo:text-indent="0cm" style:writing-mode="lr-tb"/>
      <style:text-properties style:font-name="Gabriela Nerd Font" fo:font-size="12pt"/>
    </style:style>
    <style:style style:name="P6" style:family="paragraph">
      <loext:graphic-properties draw:fill="none"/>
      <style:paragraph-properties fo:text-align="center"/>
      <style:text-properties style:font-name="Gabriela Nerd Fon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briela Nerd Font" fo:font-size="12pt"/>
    </style:style>
    <style:style style:name="P8" style:family="paragraph">
      <style:paragraph-properties fo:text-align="center"/>
      <style:text-properties fo:color="#ff8000" loext:opacity="100%" style:font-name="Gabriela Nerd Font" fo:font-size="96pt" style:font-size-asian="96pt" style:font-size-complex="96pt"/>
    </style:style>
    <style:style style:name="P9" style:family="paragraph">
      <loext:graphic-properties draw:fill="none"/>
      <style:paragraph-properties fo:text-align="center" style:writing-mode="lr-tb"/>
      <style:text-properties fo:color="#ff8000" loext:opacity="100%" style:font-name="Gabriela Nerd Font" fo:font-size="96pt" style:font-size-asian="96pt" style:font-size-complex="96pt"/>
    </style:style>
    <style:style style:name="P10" style:family="paragraph">
      <loext:graphic-properties draw:fill="solid" draw:fill-color="#ec9ba4"/>
      <style:paragraph-properties fo:text-align="center" style:writing-mode="lr-tb"/>
      <style:text-properties style:font-name="Gabriela Nerd Font" fo:font-size="12pt"/>
    </style:style>
    <style:style style:name="P11" style:family="paragraph">
      <loext:graphic-properties draw:fill="solid" draw:fill-color="#ffb66c"/>
      <style:paragraph-properties fo:text-align="center" style:writing-mode="lr-tb"/>
      <style:text-properties style:font-name="Gabriela Nerd Font" fo:font-size="12pt"/>
    </style:style>
    <style:style style:name="T1" style:family="text">
      <style:text-properties style:font-name="Gabriela Nerd Font" fo:font-size="12pt" fo:font-weight="bold" style:font-weight-asian="bold" style:font-weight-complex="bold"/>
    </style:style>
    <style:style style:name="T2" style:family="text">
      <style:text-properties style:font-name="Gabriela Nerd Font" fo:font-size="10pt" style:font-size-asian="10pt" style:font-size-complex="10pt"/>
    </style:style>
    <style:style style:name="T3" style:family="text">
      <style:text-properties style:font-name="Gabriela Nerd Font" fo:font-size="12pt" fo:font-weight="bold" style:font-size-asian="10pt" style:font-weight-asian="bold" style:font-size-complex="10pt" style:font-weight-complex="bold"/>
    </style:style>
    <style:style style:name="T4" style:family="text">
      <style:text-properties style:font-name="Gabriela Nerd Font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Gabriela Nerd Font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6" style:family="text">
      <style:text-properties style:font-name="Gabriela Nerd Font" fo:font-size="10pt" style:letter-kerning="true" style:font-name-asian="Microsoft YaHei" style:font-size-asian="10pt" style:font-name-complex="Arial" style:font-size-complex="10pt"/>
    </style:style>
    <style:style style:name="T7" style:family="text">
      <style:text-properties style:font-name="Gabriela Nerd Font" fo:font-size="12pt"/>
    </style:style>
    <style:style style:name="T8" style:family="text">
      <style:text-properties fo:color="#ff8000" loext:opacity="100%" style:font-name="Gabriela Nerd Font"/>
    </style:style>
    <style:style style:name="T9" style:family="text">
      <style:text-properties style:font-name="Gabriela Nerd Font" fo:font-size="12pt" fo:font-weight="normal" style:font-weight-asian="normal" style:font-weight-complex="normal"/>
    </style:style>
    <style:style style:name="T10" style:family="text">
      <style:text-properties style:font-name="Gabriela Nerd Font" fo:font-size="12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3.048cm" svg:height="2.54cm" svg:x="23.716cm" svg:y="1.859cm">
          <text:p text:style-name="P1"><text:span text:style-name="T1">Adam</text:span></text:p>
          <text:p text:style-name="P1"><text:span text:style-name="T2">1Ch 1:1</text:span></text:p>
          <text:p text:style-name="P1"><text:span text:style-name="T2">Gen 5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2" draw:id="id12" draw:layer="layout" svg:width="3.048cm" svg:height="2.54cm" svg:x="23.719cm" svg:y="4.869cm">
          <text:p text:style-name="P1"><text:span text:style-name="T1">Sheth</text:span></text:p>
          <text:p text:style-name="P1"><text:span text:style-name="T2">1Ch 1:1</text:span></text:p>
          <text:p text:style-name="P3"><text:span text:style-name="T3">Seth</text:span></text:p>
          <text:p text:style-name="P3"><text:span text:style-name="T4">Gen 4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5" xml:id="id13" draw:id="id13" draw:layer="layout" svg:width="3.048cm" svg:height="2.54cm" svg:x="23.718cm" svg:y="7.928cm">
          <text:p text:style-name="P4"><text:span text:style-name="T5">Enosh</text:span></text:p>
          <text:p text:style-name="P4"><text:span text:style-name="T6">1Ch 1:1</text:span></text:p>
          <text:p text:style-name="P3"><text:span text:style-name="T5">Enos</text:span></text:p>
          <text:p text:style-name="P3"><text:span text:style-name="T6">Gen 5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5" xml:id="id15" draw:id="id15" draw:layer="layout" svg:width="3.048cm" svg:height="2.54cm" svg:x="23.72cm" svg:y="10.952cm">
          <text:p text:style-name="P4"><text:span text:style-name="T5">Kenan</text:span></text:p>
          <text:p text:style-name="P4"><text:span text:style-name="T6">1Ch 1:2</text:span></text:p>
          <text:p text:style-name="P3"><text:span text:style-name="T5">Cainan</text:span></text:p>
          <text:p text:style-name="P3"><text:span text:style-name="T6">Gen 5: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6" draw:id="id16" draw:layer="layout" svg:width="3.048cm" svg:height="2.54cm" svg:x="23.72cm" svg:y="13.982cm">
          <text:p text:style-name="P1"><text:span text:style-name="T1">Mahalaleel</text:span></text:p>
          <text:p text:style-name="P1"><text:span text:style-name="T2">1Ch 1:2</text:span></text:p>
          <text:p text:style-name="P1"><text:span text:style-name="T2">Gen 5:12</text:span></text:p>
          <text:p text:style-name="P3"><text:span text:style-name="T1">Maleleel</text:span></text:p>
          <text:p text:style-name="P3"><text:span text:style-name="T2">Luk 3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7" draw:id="id17" draw:layer="layout" svg:width="3.048cm" svg:height="2.54cm" svg:x="23.726cm" svg:y="16.939cm">
          <text:p text:style-name="P1"><text:span text:style-name="T1">Jered</text:span></text:p>
          <text:p text:style-name="P1"><text:span text:style-name="T2">1Ch 1:2</text:span></text:p>
          <text:p text:style-name="P3"><text:span text:style-name="T1">Jared</text:span></text:p>
          <text:p text:style-name="P3"><text:span text:style-name="T2">Gen 5: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8" draw:id="id18" draw:layer="layout" svg:width="3.048cm" svg:height="2.54cm" svg:x="23.726cm" svg:y="20.114cm">
          <text:p text:style-name="P1"><text:span text:style-name="T1">Henoch</text:span></text:p>
          <text:p text:style-name="P3"><text:span text:style-name="T2">1Ch 1:3</text:span></text:p>
          <text:p text:style-name="P1"><text:span text:style-name="T1">Enoch</text:span></text:p>
          <text:p text:style-name="P1"><text:span text:style-name="T2">Gen 5: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9" draw:id="id19" draw:layer="layout" svg:width="3.15cm" svg:height="2.54cm" svg:x="23.682cm" svg:y="23.262cm">
          <text:p text:style-name="P1"><text:span text:style-name="T1">Methusela</text:span><text:span text:style-name="T1">h</text:span></text:p>
          <text:p text:style-name="P1"><text:span text:style-name="T2">1Ch 1:3</text:span></text:p>
          <text:p text:style-name="P1"><text:span text:style-name="T2">Gen 5:21</text:span></text:p>
          <text:p text:style-name="P1"><text:span text:style-name="T1">Mathusala</text:span></text:p>
          <text:p text:style-name="P1"><text:span text:style-name="T2">Luke 3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0" draw:id="id20" draw:layer="layout" svg:width="3.048cm" svg:height="2.54cm" svg:x="23.738cm" svg:y="26.364cm">
          <text:p text:style-name="P1"><text:span text:style-name="T1">Lamech</text:span></text:p>
          <text:p text:style-name="P1"><text:span text:style-name="T2">1Ch 1:3</text:span></text:p>
          <text:p text:style-name="P1"><text:span text:style-name="T2">Gen 5:26</text:span></text:p>
          <text:p text:style-name="P1"><text:span text:style-name="T2">Luk 3: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1" draw:id="id21" draw:layer="layout" svg:width="3.048cm" svg:height="2.54cm" svg:x="23.753cm" svg:y="29.439cm">
          <text:p text:style-name="P1"><text:span text:style-name="T1">Noah</text:span></text:p>
          <text:p text:style-name="P1"><text:span text:style-name="T2">1Ch 1:4</text:span></text:p>
          <text:p text:style-name="P1"><text:span text:style-name="T2">Gen 5:28,29</text:span></text:p>
          <text:p text:style-name="P3"><text:span text:style-name="T1">Noe</text:span></text:p>
          <text:p text:style-name="P3"><text:span text:style-name="T2">Luk 3: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5" draw:id="id5" draw:layer="layout" svg:width="3.048cm" svg:height="2.54cm" svg:x="23.777cm" svg:y="32.745cm">
          <text:p text:style-name="P1"><text:span text:style-name="T1">Shem</text:span></text:p>
          <text:p text:style-name="P1"><text:span text:style-name="T2">1Ch 1:4</text:span></text:p>
          <text:p text:style-name="P1"><text:span text:style-name="T2">Gen 5:32</text:span></text:p>
          <text:p text:style-name="P3"><text:span text:style-name="T1">Sem</text:span></text:p>
          <text:p text:style-name="P3"><text:span text:style-name="T2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22cm" svg:y1="45.421cm" svg:x2="25.322cm" svg:y2="45.887cm" draw:start-shape="id1" draw:start-glue-point="2" draw:end-shape="id2" draw:end-glue-point="0" svg:d="M25322 45421v466" svg:viewBox="0 0 1 467">
          <text:p/>
        </draw:connector>
        <draw:connector draw:style-name="gr3" draw:text-style-name="P6" draw:layer="layout" draw:type="curve" svg:x1="25.322cm" svg:y1="48.917cm" svg:x2="25.329cm" svg:y2="49.605cm" draw:start-shape="id2" draw:start-glue-point="2" draw:end-shape="id3" draw:end-glue-point="0" svg:d="M25322 48917c0 517 7 174 7 688" svg:viewBox="0 0 8 689">
          <text:p/>
        </draw:connector>
        <draw:connector draw:style-name="gr4" draw:text-style-name="P6" draw:layer="layout" draw:type="curve" svg:x1="25.317cm" svg:y1="41.689cm" svg:x2="25.322cm" svg:y2="42.323cm" draw:start-shape="id4" draw:start-glue-point="2" draw:end-shape="id1" draw:end-glue-point="0" svg:d="M25317 41689c0 477 5 160 5 634" svg:viewBox="0 0 6 635">
          <text:p/>
        </draw:connector>
        <draw:connector draw:style-name="gr3" draw:text-style-name="P6" draw:layer="layout" draw:type="curve" svg:x1="25.301cm" svg:y1="35.285cm" svg:x2="25.317cm" svg:y2="36.009cm" draw:start-shape="id5" draw:start-glue-point="2" draw:end-shape="id6" draw:end-glue-point="0" svg:d="M25301 35285c0 544 16 183 16 724" svg:viewBox="0 0 17 725">
          <text:p/>
        </draw:connector>
        <draw:custom-shape draw:style-name="gr1" draw:text-style-name="P2" xml:id="id6" draw:id="id6" draw:layer="layout" svg:width="3.048cm" svg:height="2.54cm" svg:x="23.793cm" svg:y="36.009cm">
          <text:p text:style-name="P1"><text:span text:style-name="T1">Arphaxad</text:span></text:p>
          <text:p text:style-name="P1"><text:span text:style-name="T2">1Ch 1:17</text:span></text:p>
          <text:p text:style-name="P1"><text:span text:style-name="T2">Gen 1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xml:id="id1" draw:id="id1" draw:layer="layout" svg:width="3.048cm" svg:height="3.098cm" svg:x="23.798cm" svg:y="42.323cm">
          <text:p text:style-name="P3"><text:span text:style-name="T1">Salah</text:span></text:p>
          <text:p text:style-name="P3"><text:span text:style-name="T4">Gen 10:24</text:span></text:p>
          <text:p text:style-name="P3"><text:span text:style-name="T1">Shelah</text:span></text:p>
          <text:p text:style-name="P3"><text:span text:style-name="T2">1Ch 1:18</text:span></text:p>
          <text:p text:style-name="P3"><text:span text:style-name="T3">Sala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2" xml:id="id2" draw:id="id2" draw:layer="layout" svg:width="3.048cm" svg:height="3.03cm" svg:x="23.798cm" svg:y="45.887cm">
          <text:p text:style-name="P1"><text:span text:style-name="T1">Eber</text:span></text:p>
          <text:p text:style-name="P1"><text:span text:style-name="T2">1Ch 1:18</text:span></text:p>
          <text:p text:style-name="P1"><text:span text:style-name="T2">Gen 11:14</text:span></text:p>
          <text:p text:style-name="P1"><text:span text:style-name="T2">Num 24:24</text:span></text:p>
          <text:p text:style-name="P3"><text:span text:style-name="T3">Heber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3" draw:id="id3" draw:layer="layout" svg:width="3.048cm" svg:height="2.54cm" svg:x="23.805cm" svg:y="49.605cm">
          <text:p text:style-name="P1"><text:span text:style-name="T1">Peleg</text:span></text:p>
          <text:p text:style-name="P1"><text:span text:style-name="T2">1Ch 1:19</text:span></text:p>
          <text:p text:style-name="P1"><text:span text:style-name="T2">Gen 11:16</text:span></text:p>
          <text:p text:style-name="P3"><text:span text:style-name="T3">Phalec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29cm" svg:y1="52.145cm" svg:x2="25.33cm" svg:y2="52.706cm" draw:start-shape="id3" draw:start-glue-point="2" draw:end-shape="id7" draw:end-glue-point="0" svg:d="M25329 52145c0 421 1 141 1 561" svg:viewBox="0 0 2 562">
          <text:p/>
        </draw:connector>
        <draw:custom-shape draw:style-name="gr1" draw:text-style-name="P2" xml:id="id7" draw:id="id7" draw:layer="layout" svg:width="3.048cm" svg:height="2.54cm" svg:x="23.806cm" svg:y="52.706cm">
          <text:p text:style-name="P1"><text:span text:style-name="T1">Reu</text:span></text:p>
          <text:p text:style-name="P1"><text:span text:style-name="T2">1Ch 1:25</text:span></text:p>
          <text:p text:style-name="P1"><text:span text:style-name="T2">Gen 11:18</text:span></text:p>
          <text:p text:style-name="P3"><text:span text:style-name="T3">Ragau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8" draw:id="id8" draw:layer="layout" svg:width="3.048cm" svg:height="2.54cm" svg:x="23.81cm" svg:y="55.907cm">
          <text:p text:style-name="P1"><text:span text:style-name="T1">Serug</text:span></text:p>
          <text:p text:style-name="P1"><text:span text:style-name="T2">1Ch 1:26</text:span></text:p>
          <text:p text:style-name="P1"><text:span text:style-name="T2">Gen 11:20</text:span></text:p>
          <text:p text:style-name="P3"><text:span text:style-name="T3">Saruch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9" draw:id="id9" draw:layer="layout" svg:width="3.048cm" svg:height="2.54cm" svg:x="23.81cm" svg:y="59.107cm">
          <text:p text:style-name="P1"><text:span text:style-name="T1">Nahor</text:span></text:p>
          <text:p text:style-name="P1"><text:span text:style-name="T2">1Ch 1:26</text:span></text:p>
          <text:p text:style-name="P1"><text:span text:style-name="T2">Gen 1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0" draw:id="id10" draw:layer="layout" svg:width="3.048cm" svg:height="2.54cm" svg:x="23.81cm" svg:y="62.211cm">
          <text:p text:style-name="P1"><text:span text:style-name="T1">Terah</text:span></text:p>
          <text:p text:style-name="P1"><text:span text:style-name="T7">1Ch 1:26</text:span></text:p>
          <text:p text:style-name="P1"><text:span text:style-name="T7">Gen 11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1" draw:id="id11" draw:layer="layout" svg:width="3.048cm" svg:height="2.54cm" svg:x="19.51cm" svg:y="70.407cm">
          <text:p text:style-name="P1"><text:span text:style-name="T1">Abram</text:span></text:p>
          <text:p text:style-name="P1"><text:span text:style-name="T1">Abraham</text:span></text:p>
          <text:p text:style-name="P1"><text:span text:style-name="T2">1Ch 1:27</text:span></text:p>
          <text:p text:style-name="P1"><text:span text:style-name="T2">Gen 1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34cm" svg:y1="58.447cm" svg:x2="25.334cm" svg:y2="59.107cm" draw:start-shape="id8" draw:start-glue-point="2" draw:end-shape="id9" draw:end-glue-point="0" svg:d="M25334 58447v660" svg:viewBox="0 0 1 661">
          <text:p/>
        </draw:connector>
        <draw:connector draw:style-name="gr3" draw:text-style-name="P6" draw:layer="layout" draw:type="curve" svg:x1="25.334cm" svg:y1="61.647cm" svg:x2="25.334cm" svg:y2="62.211cm" draw:start-shape="id9" draw:start-glue-point="2" draw:end-shape="id10" draw:end-glue-point="0" svg:d="M25334 61647v564" svg:viewBox="0 0 1 565">
          <text:p/>
        </draw:connector>
        <draw:connector draw:style-name="gr3" draw:text-style-name="P6" draw:layer="layout" draw:type="curve" svg:x1="25.334cm" svg:y1="64.751cm" svg:x2="21.034cm" svg:y2="70.407cm" draw:start-shape="id10" draw:start-glue-point="2" draw:end-shape="id11" draw:end-glue-point="0" svg:d="M25334 64751c0 4243-4300 1416-4300 5656" svg:viewBox="0 0 4301 5657">
          <text:p/>
        </draw:connector>
        <draw:connector draw:style-name="gr3" draw:text-style-name="P6" draw:layer="layout" draw:type="curve" svg:x1="25.33cm" svg:y1="55.246cm" svg:x2="25.334cm" svg:y2="55.907cm" draw:start-shape="id7" draw:start-glue-point="2" draw:end-shape="id8" draw:end-glue-point="0" svg:d="M25330 55246c0 166 1 331 2 331s2 165 2 330" svg:viewBox="0 0 5 662">
          <text:p/>
        </draw:connector>
        <draw:custom-shape draw:style-name="gr7" draw:text-style-name="P9" draw:layer="layout" svg:width="11.748cm" svg:height="6.341cm" svg:x="34.798cm" svg:y="31.305cm">
          <text:p text:style-name="P8"><text:span text:style-name="T8">Lot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25.243cm" svg:y1="7.409cm" svg:x2="25.242cm" svg:y2="7.928cm" draw:start-shape="id12" draw:start-glue-point="2" draw:end-shape="id13" draw:end-glue-point="0" svg:d="M25243 7409l-1 519" svg:viewBox="0 0 2 520">
          <text:p/>
        </draw:connector>
        <draw:connector draw:style-name="gr8" draw:text-style-name="P6" draw:layer="layout" draw:type="line" svg:x1="25.24cm" svg:y1="4.399cm" svg:x2="25.243cm" svg:y2="4.869cm" draw:start-shape="id14" draw:start-glue-point="2" draw:end-shape="id12" draw:end-glue-point="0" svg:d="M25240 4399l3 470" svg:viewBox="0 0 4 471">
          <text:p/>
        </draw:connector>
        <draw:connector draw:style-name="gr8" draw:text-style-name="P6" draw:layer="layout" draw:type="line" svg:x1="25.242cm" svg:y1="10.468cm" svg:x2="25.244cm" svg:y2="10.952cm" draw:start-shape="id13" draw:start-glue-point="2" draw:end-shape="id15" draw:end-glue-point="0" svg:d="M25242 10468l2 484" svg:viewBox="0 0 3 485">
          <text:p/>
        </draw:connector>
        <draw:connector draw:style-name="gr8" draw:text-style-name="P6" draw:layer="layout" draw:type="line" svg:x1="25.244cm" svg:y1="13.492cm" svg:x2="25.244cm" svg:y2="13.982cm" draw:start-shape="id15" draw:start-glue-point="2" draw:end-shape="id16" draw:end-glue-point="0" svg:d="M25244 13492v490" svg:viewBox="0 0 1 491">
          <text:p/>
        </draw:connector>
        <draw:connector draw:style-name="gr8" draw:text-style-name="P6" draw:layer="layout" draw:type="line" svg:x1="25.244cm" svg:y1="16.522cm" svg:x2="25.25cm" svg:y2="16.939cm" draw:start-shape="id16" draw:start-glue-point="2" draw:end-shape="id17" draw:end-glue-point="0" svg:d="M25244 16522l6 417" svg:viewBox="0 0 7 418">
          <text:p/>
        </draw:connector>
        <draw:connector draw:style-name="gr8" draw:text-style-name="P6" draw:layer="layout" draw:type="line" svg:x1="25.25cm" svg:y1="19.479cm" svg:x2="25.25cm" svg:y2="20.114cm" draw:start-shape="id17" draw:start-glue-point="2" draw:end-shape="id18" draw:end-glue-point="0" svg:d="M25250 19479v635" svg:viewBox="0 0 1 636">
          <text:p/>
        </draw:connector>
        <draw:connector draw:style-name="gr8" draw:text-style-name="P6" draw:layer="layout" draw:type="line" svg:x1="25.25cm" svg:y1="22.654cm" svg:x2="25.257cm" svg:y2="23.262cm" draw:start-shape="id18" draw:start-glue-point="2" draw:end-shape="id19" draw:end-glue-point="0" svg:d="M25250 22654l7 608" svg:viewBox="0 0 8 609">
          <text:p/>
        </draw:connector>
        <draw:connector draw:style-name="gr8" draw:text-style-name="P6" draw:layer="layout" draw:type="line" svg:x1="25.257cm" svg:y1="25.802cm" svg:x2="25.262cm" svg:y2="26.364cm" draw:start-shape="id19" draw:start-glue-point="2" draw:end-shape="id20" draw:end-glue-point="0" svg:d="M25257 25802l5 562" svg:viewBox="0 0 6 563">
          <text:p/>
        </draw:connector>
        <draw:connector draw:style-name="gr8" draw:text-style-name="P6" draw:layer="layout" draw:type="line" svg:x1="25.262cm" svg:y1="28.904cm" svg:x2="25.277cm" svg:y2="29.439cm" draw:start-shape="id20" draw:start-glue-point="2" draw:end-shape="id21" draw:end-glue-point="0" svg:d="M25262 28904l15 535" svg:viewBox="0 0 16 536">
          <text:p/>
        </draw:connector>
        <draw:connector draw:style-name="gr3" draw:text-style-name="P6" draw:layer="layout" draw:type="line" svg:x1="25.277cm" svg:y1="31.979cm" svg:x2="25.301cm" svg:y2="32.745cm" draw:start-shape="id21" draw:start-glue-point="2" draw:end-shape="id5" draw:end-glue-point="0" svg:d="M25277 31979l24 766" svg:viewBox="0 0 25 767">
          <text:p/>
        </draw:connector>
        <draw:custom-shape draw:style-name="gr1" draw:text-style-name="P2" xml:id="id4" draw:id="id4" draw:layer="layout" svg:width="3.048cm" svg:height="2.54cm" svg:x="23.793cm" svg:y="39.149cm">
          <text:p text:style-name="P1"><text:span text:style-name="T1">Cainan</text:span></text:p>
          <text:p text:style-name="P1"><text:span text:style-name="T2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" draw:text-style-name="P6" draw:layer="layout" draw:type="curve" svg:x1="25.317cm" svg:y1="38.549cm" svg:x2="25.317cm" svg:y2="39.149cm" draw:start-shape="id6" draw:start-glue-point="2" draw:end-shape="id4" draw:end-glue-point="0" svg:d="M25317 38549v600" svg:viewBox="0 0 1 601">
          <text:p/>
        </draw:connector>
        <draw:custom-shape draw:style-name="gr1" draw:text-style-name="P2" xml:id="id22" draw:id="id22" draw:layer="layout" svg:width="3.048cm" svg:height="2.54cm" svg:x="23.812cm" svg:y="70.404cm">
          <text:p text:style-name="P1"><text:span text:style-name="T1">Nahor</text:span></text:p>
          <text:p text:style-name="P1"><text:span text:style-name="T7">Gen 1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3" draw:id="id23" draw:layer="layout" svg:width="3.048cm" svg:height="2.54cm" svg:x="36.202cm" svg:y="70.387cm">
          <text:p text:style-name="P1"><text:span text:style-name="T1">Haran</text:span></text:p>
          <text:p text:style-name="P1"><text:span text:style-name="T7">Gen 11:26,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34cm" svg:y1="64.751cm" svg:x2="25.336cm" svg:y2="70.404cm" draw:start-shape="id10" draw:start-glue-point="2" draw:end-shape="id22" draw:end-glue-point="0" svg:d="M25334 64751c0 4240 2 1414 2 5653" svg:viewBox="0 0 3 5654">
          <text:p/>
        </draw:connector>
        <draw:connector draw:style-name="gr3" draw:text-style-name="P6" draw:layer="layout" draw:type="curve" svg:x1="25.334cm" svg:y1="64.751cm" svg:x2="37.726cm" svg:y2="70.387cm" draw:start-shape="id10" draw:start-glue-point="2" draw:end-shape="id23" draw:end-glue-point="0" svg:d="M25334 64751c0 4228 12392 1411 12392 5636" svg:viewBox="0 0 12393 5637">
          <text:p/>
        </draw:connector>
        <draw:custom-shape draw:style-name="gr9" draw:text-style-name="P10" xml:id="id24" draw:id="id24" draw:layer="layout" svg:width="3.048cm" svg:height="2.54cm" svg:x="36.21cm" svg:y="75.204cm">
          <text:p text:style-name="P1"><text:span text:style-name="T1">Milcah</text:span></text:p>
          <text:p text:style-name="P1"><text:span text:style-name="T2">Gen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25" draw:id="id25" draw:layer="layout" svg:width="3.048cm" svg:height="2.54cm" svg:x="39.91cm" svg:y="75.204cm">
          <text:p text:style-name="P1"><text:span text:style-name="T1">Iscah</text:span></text:p>
          <text:p text:style-name="P1"><text:span text:style-name="T2">Gen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37.726cm" svg:y1="72.927cm" svg:x2="37.734cm" svg:y2="75.204cm" draw:start-shape="id23" draw:start-glue-point="2" draw:end-shape="id24" draw:end-glue-point="0" svg:d="M37726 72927c0 1708 8 570 8 2277" svg:viewBox="0 0 9 2278">
          <text:p/>
        </draw:connector>
        <draw:connector draw:style-name="gr3" draw:text-style-name="P6" draw:layer="layout" draw:type="curve" svg:x1="41.434cm" svg:y1="75.204cm" svg:x2="37.726cm" svg:y2="72.927cm" draw:start-shape="id25" draw:start-glue-point="0" draw:end-shape="id23" draw:end-glue-point="2" svg:d="M41434 75204c0-1707-3708-569-3708-2277" svg:viewBox="0 0 3709 2278">
          <text:p/>
        </draw:connector>
        <draw:custom-shape draw:style-name="gr1" draw:text-style-name="P2" xml:id="id26" draw:id="id26" draw:layer="layout" svg:width="3.048cm" svg:height="2.54cm" svg:x="44.681cm" svg:y="75.2cm">
          <text:p text:style-name="P1"><text:span text:style-name="T1">Lot</text:span></text:p>
          <text:p text:style-name="P1"><text:span text:style-name="T7">Gen 11:2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46.205cm" svg:y1="75.2cm" svg:x2="37.726cm" svg:y2="72.927cm" draw:start-shape="id26" draw:start-glue-point="0" draw:end-shape="id23" draw:end-glue-point="2" svg:d="M46205 75200c0-1704-8479-568-8479-2273" svg:viewBox="0 0 8480 2274">
          <text:p/>
        </draw:connector>
        <draw:custom-shape draw:style-name="gr9" draw:text-style-name="P10" xml:id="id28" draw:id="id28" draw:layer="layout" svg:width="3.048cm" svg:height="2.54cm" svg:x="38.782cm" svg:y="80.904cm">
          <text:p text:style-name="P1"><text:span text:style-name="T1">Firstborn daughter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0" xml:id="id31" draw:id="id31" draw:layer="layout" svg:width="3.181cm" svg:height="2.54cm" svg:x="51.649cm" svg:y="80.904cm">
          <text:p text:style-name="P1"><text:span text:style-name="T1">Secondborn daughter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27" draw:id="id27" draw:layer="layout" svg:width="3.048cm" svg:height="2.54cm" svg:x="51.71cm" svg:y="75.204cm">
          <text:p text:style-name="P1"><text:span text:style-name="T1">Lot’s wife</text:span></text:p>
          <text:p text:style-name="P1"><text:span text:style-name="T2">Gen 19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9" draw:id="id29" draw:layer="layout" svg:width="3.048cm" svg:height="2.54cm" svg:x="34.9cm" svg:y="80.9cm">
          <text:p text:style-name="P1"><text:span text:style-name="T1">Son in law</text:span></text:p>
          <text:p text:style-name="P1"><text:span text:style-name="T7">Gen 19: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7" xml:id="id30" draw:id="id30" draw:layer="layout" svg:width="3.048cm" svg:height="2.54cm" svg:x="55.7cm" svg:y="80.9cm">
          <text:p text:style-name="P3"><text:span text:style-name="T1">Son in law</text:span></text:p>
          <text:p text:style-name="P3"><text:span text:style-name="T9">Gen 19: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6" xml:id="id32" draw:id="id32" draw:layer="layout" draw:type="curve" svg:x1="47.729cm" svg:y1="76.47cm" svg:x2="51.71cm" svg:y2="76.474cm" draw:start-shape="id26" draw:start-glue-point="1" draw:end-shape="id27" draw:end-glue-point="3" svg:d="M47729 76470c2986 0 996 4 3981 4" svg:viewBox="0 0 3982 5">
          <text:p/>
        </draw:connector>
        <draw:connector draw:style-name="gr11" draw:text-style-name="P6" draw:layer="layout" draw:type="curve" svg:x1="38.782cm" svg:y1="82.174cm" svg:x2="37.948cm" svg:y2="82.17cm" draw:start-shape="id28" draw:start-glue-point="3" draw:end-shape="id29" draw:end-glue-point="1" svg:d="M38782 82174c-624 0-207-4-834-4" svg:viewBox="0 0 835 5">
          <text:p/>
        </draw:connector>
        <draw:connector draw:style-name="gr11" draw:text-style-name="P6" draw:layer="layout" draw:type="curve" svg:x1="55.7cm" svg:y1="82.17cm" svg:x2="54.83cm" svg:y2="82.174cm" draw:start-shape="id30" draw:start-glue-point="3" draw:end-shape="id31" draw:end-glue-point="1" svg:d="M55700 82170c-652 0-218 4-870 4" svg:viewBox="0 0 871 5">
          <text:p/>
        </draw:connector>
        <draw:connector draw:style-name="gr3" draw:text-style-name="P6" draw:layer="layout" draw:type="curve" svg:x1="49.72cm" svg:y1="76.472cm" svg:x2="53.239cm" svg:y2="80.904cm" draw:start-shape="id32" draw:start-glue-point="0" draw:end-shape="id31" draw:end-glue-point="0" svg:d="M49720 76472c0 3363 3519 1147 3519 4432" svg:viewBox="0 0 3520 4433">
          <text:p/>
        </draw:connector>
        <draw:connector draw:style-name="gr3" draw:text-style-name="P6" draw:layer="layout" draw:type="curve" svg:x1="40.306cm" svg:y1="80.904cm" svg:x2="49.72cm" svg:y2="76.472cm" draw:start-shape="id28" draw:start-glue-point="0" draw:end-shape="id32" draw:end-glue-point="0" svg:d="M40306 80904c0-3285 9414-1069 9414-4432" svg:viewBox="0 0 9415 4433">
          <text:p/>
        </draw:connector>
        <draw:custom-shape draw:style-name="gr1" draw:text-style-name="P2" xml:id="id34" draw:id="id34" draw:layer="layout" svg:width="3.048cm" svg:height="2.54cm" svg:x="43.082cm" svg:y="85.5cm">
          <text:p text:style-name="P1"><text:span text:style-name="T1">Moab</text:span></text:p>
          <text:p text:style-name="P1"><text:span text:style-name="T7">Gen 19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36" draw:id="id36" draw:layer="layout" svg:width="3.048cm" svg:height="2.54cm" svg:x="46.781cm" svg:y="85.5cm">
          <text:p text:style-name="P1"><text:span text:style-name="T1">Ben-ammi</text:span></text:p>
          <text:p text:style-name="P1"><text:span text:style-name="T7">Gen 19:3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43.256cm" svg:y1="79.322cm" svg:x2="44.606cm" svg:y2="85.5cm" draw:start-shape="id33" draw:start-glue-point="0" draw:end-shape="id34" draw:end-glue-point="0" svg:d="M43256 79322c0 6810 1350 3721 1350 6178" svg:viewBox="0 0 1351 6179">
          <text:p/>
        </draw:connector>
        <draw:connector draw:style-name="gr3" draw:text-style-name="P6" draw:layer="layout" draw:type="curve" svg:x1="49.689cm" svg:y1="79.322cm" svg:x2="48.305cm" svg:y2="85.5cm" draw:start-shape="id35" draw:start-glue-point="0" draw:end-shape="id36" draw:end-glue-point="0" svg:d="M49689 79322c0 6810-1384 3721-1384 6178" svg:viewBox="0 0 1385 6179">
          <text:p/>
        </draw:connector>
        <draw:custom-shape draw:style-name="gr12" draw:text-style-name="P11" xml:id="id38" draw:id="id38" draw:layer="layout" svg:width="3.048cm" svg:height="2.54cm" svg:x="43.085cm" svg:y="89.581cm">
          <text:p text:style-name="P1"><text:span text:style-name="T1">Moabites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xml:id="id37" draw:id="id37" draw:layer="layout" svg:width="3.123cm" svg:height="2.54cm" svg:x="46.748cm" svg:y="89.556cm">
          <text:p text:style-name="P1"><text:span text:style-name="T1">Ammonites</text:span></text:p>
          <text:p text:style-name="P1"><text:span text:style-name="T2">Gen 19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6" draw:layer="layout" draw:type="curve" svg:x1="48.305cm" svg:y1="88.04cm" svg:x2="48.309cm" svg:y2="89.556cm" draw:start-shape="id36" draw:start-glue-point="2" draw:end-shape="id37" draw:end-glue-point="0" svg:d="M48305 88040c0 1138 4 381 4 1516" svg:viewBox="0 0 5 1517">
          <text:p/>
        </draw:connector>
        <draw:connector draw:style-name="gr14" draw:text-style-name="P6" draw:layer="layout" draw:type="curve" svg:x1="44.606cm" svg:y1="88.04cm" svg:x2="44.609cm" svg:y2="89.581cm" draw:start-shape="id34" draw:start-glue-point="2" draw:end-shape="id38" draw:end-glue-point="0" svg:d="M44606 88040c0 1156 3 386 3 1541" svg:viewBox="0 0 4 1542">
          <text:p/>
        </draw:connector>
        <draw:connector draw:style-name="gr11" draw:text-style-name="P6" xml:id="id35" draw:id="id35" draw:layer="layout" draw:type="curve" svg:x1="47.729cm" svg:y1="76.47cm" svg:x2="51.649cm" svg:y2="82.174cm" draw:start-shape="id26" draw:start-glue-point="1" draw:end-shape="id31" draw:end-glue-point="3" svg:d="M47729 76470c2940 0 980 5704 3920 5704" svg:viewBox="0 0 3921 5705">
          <text:p/>
        </draw:connector>
        <draw:connector draw:style-name="gr11" draw:text-style-name="P6" xml:id="id33" draw:id="id33" draw:layer="layout" draw:type="curve" svg:x1="41.83cm" svg:y1="82.174cm" svg:x2="44.681cm" svg:y2="76.47cm" draw:start-shape="id28" draw:start-glue-point="1" draw:end-shape="id26" draw:end-glue-point="3" svg:d="M41830 82174c2139 0 714-5704 2851-5704" svg:viewBox="0 0 2852 5705">
          <text:p/>
        </draw:connector>
        <draw:custom-shape draw:style-name="gr1" draw:text-style-name="P2" xml:id="id39" draw:id="id39" draw:layer="layout" svg:width="3.048cm" svg:height="2.54cm" svg:x="9.412cm" svg:y="77.704cm">
          <text:p text:style-name="P1"><text:span text:style-name="T1">Kemuel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8" draw:id="id48" draw:layer="layout" svg:width="3.048cm" svg:height="2.54cm" svg:x="13.112cm" svg:y="77.704cm">
          <text:p text:style-name="P1"><text:span text:style-name="T1">Chesed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2" draw:id="id42" draw:layer="layout" svg:width="3.048cm" svg:height="2.54cm" svg:x="17.012cm" svg:y="77.704cm">
          <text:p text:style-name="P1"><text:span text:style-name="T1">Hazo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3" draw:id="id43" draw:layer="layout" svg:width="3.048cm" svg:height="2.54cm" svg:x="20.912cm" svg:y="77.704cm">
          <text:p text:style-name="P1"><text:span text:style-name="T1">Pildash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4" draw:id="id44" draw:layer="layout" svg:width="3.048cm" svg:height="2.54cm" svg:x="24.812cm" svg:y="77.704cm">
          <text:p text:style-name="P1"><text:span text:style-name="T1">Jidlaph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9" draw:id="id49" draw:layer="layout" svg:width="3.048cm" svg:height="2.54cm" svg:x="2.212cm" svg:y="77.704cm">
          <text:p text:style-name="P1"><text:span text:style-name="T10">Huz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7" draw:id="id47" draw:layer="layout" svg:width="3.048cm" svg:height="2.54cm" svg:x="5.812cm" svg:y="77.704cm">
          <text:p text:style-name="P1"><text:span text:style-name="T1">Buz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0" draw:id="id40" draw:layer="layout" svg:width="3.048cm" svg:height="2.54cm" svg:x="9.412cm" svg:y="81.104cm">
          <text:p text:style-name="P1"><text:span text:style-name="T1">Aram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5" draw:id="id45" draw:layer="layout" svg:width="3.048cm" svg:height="2.54cm" svg:x="28.712cm" svg:y="77.704cm">
          <text:p text:style-name="P1"><text:span text:style-name="T1">Bethuel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46" draw:id="id46" draw:layer="layout" svg:width="3.048cm" svg:height="2.54cm" svg:x="28.71cm" svg:y="80.904cm">
          <text:p text:style-name="P1"><text:span text:style-name="T1">Rebekah</text:span></text:p>
          <text:p text:style-name="P1"><text:span text:style-name="T2">Gen 22:23</text:span></text:p>
          <text:p text:style-name="P3"><text:span text:style-name="T3">Rebecca</text:span></text:p>
          <text:p text:style-name="P3"><text:span text:style-name="T2">Rom 9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10.936cm" svg:y1="80.244cm" svg:x2="10.936cm" svg:y2="81.104cm" draw:start-shape="id39" draw:start-glue-point="2" draw:end-shape="id40" draw:end-glue-point="0" svg:d="M10936 80244v860" svg:viewBox="0 0 1 861">
          <text:p/>
        </draw:connector>
        <draw:connector draw:style-name="gr3" draw:text-style-name="P6" draw:layer="layout" draw:type="curve" svg:x1="31.536cm" svg:y1="74.074cm" svg:x2="18.536cm" svg:y2="77.704cm" draw:start-shape="id41" draw:start-glue-point="0" draw:end-shape="id42" draw:end-glue-point="0" svg:d="M31536 74074c0 4560-13000 2745-13000 3630" svg:viewBox="0 0 13001 3631">
          <text:p/>
        </draw:connector>
        <draw:connector draw:style-name="gr3" draw:text-style-name="P6" draw:layer="layout" draw:type="curve" svg:x1="31.536cm" svg:y1="74.074cm" svg:x2="22.436cm" svg:y2="77.704cm" draw:start-shape="id41" draw:start-glue-point="0" draw:end-shape="id43" draw:end-glue-point="0" svg:d="M31536 74074c0 4560-9100 2745-9100 3630" svg:viewBox="0 0 9101 3631">
          <text:p/>
        </draw:connector>
        <draw:connector draw:style-name="gr3" draw:text-style-name="P6" draw:layer="layout" draw:type="curve" svg:x1="31.536cm" svg:y1="74.074cm" svg:x2="26.336cm" svg:y2="77.704cm" draw:start-shape="id41" draw:start-glue-point="0" draw:end-shape="id44" draw:end-glue-point="0" svg:d="M31536 74074c0 4560-5200 2745-5200 3630" svg:viewBox="0 0 5201 3631">
          <text:p/>
        </draw:connector>
        <draw:connector draw:style-name="gr3" draw:text-style-name="P6" draw:layer="layout" draw:type="curve" svg:x1="31.536cm" svg:y1="74.074cm" svg:x2="30.236cm" svg:y2="77.704cm" draw:start-shape="id41" draw:start-glue-point="0" draw:end-shape="id45" draw:end-glue-point="0" svg:d="M31536 74074c0 4560-1300 2745-1300 3630" svg:viewBox="0 0 1301 3631">
          <text:p/>
        </draw:connector>
        <draw:connector draw:style-name="gr3" draw:text-style-name="P6" draw:layer="layout" draw:type="curve" svg:x1="30.236cm" svg:y1="80.244cm" svg:x2="30.234cm" svg:y2="80.904cm" draw:start-shape="id45" draw:start-glue-point="2" draw:end-shape="id46" draw:end-glue-point="0" svg:d="M30236 80244c0 496-2 167-2 660" svg:viewBox="0 0 3 661">
          <text:p/>
        </draw:connector>
        <draw:connector draw:style-name="gr3" draw:text-style-name="P6" draw:layer="layout" draw:type="curve" svg:x1="31.536cm" svg:y1="74.074cm" svg:x2="10.936cm" svg:y2="77.704cm" draw:start-shape="id41" draw:start-glue-point="0" draw:end-shape="id39" draw:end-glue-point="0" svg:d="M31536 74074c0 4560-20600 2745-20600 3630" svg:viewBox="0 0 20601 3631">
          <text:p/>
        </draw:connector>
        <draw:connector draw:style-name="gr3" draw:text-style-name="P6" draw:layer="layout" draw:type="curve" svg:x1="31.536cm" svg:y1="74.074cm" svg:x2="7.336cm" svg:y2="77.704cm" draw:start-shape="id41" draw:start-glue-point="0" draw:end-shape="id47" draw:end-glue-point="0" svg:d="M31536 74074c0 4560-24200 2745-24200 3630" svg:viewBox="0 0 24201 3631">
          <text:p/>
        </draw:connector>
        <draw:connector draw:style-name="gr3" draw:text-style-name="P6" draw:layer="layout" draw:type="curve" svg:x1="31.536cm" svg:y1="74.074cm" svg:x2="14.636cm" svg:y2="77.704cm" draw:start-shape="id41" draw:start-glue-point="0" draw:end-shape="id48" draw:end-glue-point="0" svg:d="M31536 74074c0 4560-16900 2745-16900 3630" svg:viewBox="0 0 16901 3631">
          <text:p/>
        </draw:connector>
        <draw:connector draw:style-name="gr3" draw:text-style-name="P6" draw:layer="layout" draw:type="curve" svg:x1="31.536cm" svg:y1="74.074cm" svg:x2="3.736cm" svg:y2="77.704cm" draw:start-shape="id41" draw:start-glue-point="0" draw:end-shape="id49" draw:end-glue-point="0" svg:d="M31536 74074c0 4560-27800 2745-27800 3630" svg:viewBox="0 0 27801 3631">
          <text:p/>
        </draw:connector>
        <draw:connector draw:style-name="gr11" draw:text-style-name="P6" xml:id="id41" draw:id="id41" draw:layer="layout" draw:type="curve" svg:x1="36.21cm" svg:y1="76.474cm" svg:x2="26.86cm" svg:y2="71.674cm" draw:start-shape="id24" draw:start-glue-point="3" draw:end-shape="id22" draw:end-glue-point="1" svg:d="M36210 76474c-7011 0-2336-4800-9350-4800" svg:viewBox="0 0 935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Gabriela Nerd Font1" svg:font-family="'Gabriela Nerd Font'" style:font-adornments="Regular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60.96cm" fo:page-height="93.98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9T07:30:44.577000000</meta:creation-date>
    <dc:date>2025-10-15T10:17:11.868662900</dc:date>
    <meta:editing-duration>P1DT15H22S</meta:editing-duration>
    <meta:editing-cycles>869</meta:editing-cycles>
    <meta:generator>LibreOffice/25.8.2.2$Windows_X86_64 LibreOffice_project/d401f2107ccab8f924a8e2df40f573aab7605b6f</meta:generator>
    <meta:print-date>2025-10-15T10:16:34.156765600</meta:print-date>
    <meta:printed-by>PDF files: William K. McDannell Jr.</meta:printed-by>
    <dc:title>1 Chronicles 1 genealogy</dc:title>
    <dc:creator>William K. McDannell Jr.</dc:creator>
    <meta:document-statistic meta:object-count="93"/>
  </office:meta>
</office:document-meta>
</file>