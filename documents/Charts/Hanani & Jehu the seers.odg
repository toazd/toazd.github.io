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Fonts/Font_Gabriela_Nerd_Font_1.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Pictures/10000001000006B2000002ED043CE786.png" manifest:media-type="image/png"/>
  <manifest:file-entry manifest:full-path="Pictures/10000001000002D0000002D04CA5521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Gabriela Nerd Font" svg:font-family="'Gabriela Nerd Font'" style:font-adornments="Regular" style:font-pitch="variable">
      <svg:font-face-src>
        <svg:font-face-uri xlink:href="Fonts/Font_Gabriela_Nerd_Font_1.ttf" xlink:type="simple" loext:font-style="normal" loext:font-weight="normal">
          <svg:font-face-format svg:string="truetype"/>
        </svg:font-face-uri>
      </svg:font-face-src>
    </style:font-face>
    <style:font-face style:name="Gabriela Nerd Font1" svg:font-family="'Gabriela Nerd Font'" style:font-pitch="variable">
      <svg:font-face-src>
        <svg:font-face-uri xlink:href="Fonts/Font_Gabriela_Nerd_Font_1.ttf" xlink:type="simple" loext:font-style="normal" loext:font-weight="normal">
          <svg:font-face-format svg:string="truetype"/>
        </svg:font-face-uri>
      </svg:font-face-src>
    </style:font-fac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fo:min-height="0cm" fo:min-width="0cm" loext:decorative="false"/>
      <style:paragraph-properties style:writing-mode="lr-tb"/>
    </style:style>
    <style:style style:name="gr3" style:family="graphic" style:parent-style-name="standard">
      <style:graphic-properties svg:stroke-color="#ff8000" draw:fill="none" loext:fill-use-slide-background="false" draw:textarea-horizontal-align="left" draw:textarea-vertical-align="bottom" draw:auto-grow-height="false" fo:min-height="24.69cm" fo:min-width="2.363cm" style:writing-mode="lr-tb" loext:decorative="false"/>
      <style:paragraph-properties style:writing-mode="lr-tb"/>
    </style:style>
    <style:style style:name="gr4" style:family="graphic" style:parent-style-name="standard">
      <style:graphic-properties svg:stroke-color="#ff8000" draw:fill="none" loext:fill-use-slide-background="false" draw:textarea-horizontal-align="left" draw:textarea-vertical-align="top" draw:auto-grow-height="false" fo:min-height="7.275cm" fo:min-width="2.363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2.042cm" fo:min-width="1.792cm" style:writing-mode="lr-tb" loext:decorative="false"/>
      <style:paragraph-properties style:writing-mode="lr-tb"/>
    </style:style>
    <style:style style:name="gr6" style:family="graphic" style:parent-style-name="objectwithoutfill">
      <style:graphic-properties svg:stroke-width="0.106cm" svg:stroke-color="#ff0000" draw:marker-start-width="0.359cm" draw:marker-end="Arrowheads_20_1" draw:marker-end-width="0.459cm" draw:fill="none" draw:textarea-vertical-align="middle" fo:padding-top="0.178cm" fo:padding-bottom="0.178cm" fo:padding-left="0.303cm" fo:padding-right="0.303cm" loext:decorative="false"/>
    </style:style>
    <style:style style:name="gr7" style:family="graphic" style:parent-style-name="standard">
      <style:graphic-properties draw:auto-grow-height="true" fo:min-height="0cm" fo:min-width="0cm"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withoutfill">
      <style:graphic-properties svg:stroke-width="0.106cm" draw:marker-start-width="0.359cm" draw:marker-end="Arrowheads_20_2" draw:marker-end-width="0.459cm" draw:fill="none" draw:textarea-vertical-align="middle" fo:padding-top="0.178cm" fo:padding-bottom="0.178cm" fo:padding-left="0.303cm" fo:padding-right="0.303cm" loext:decorative="false"/>
    </style:style>
    <style:style style:name="gr10" style:family="graphic" style:parent-style-name="objectwithoutfill">
      <style:graphic-properties svg:stroke-width="0.106cm" draw:marker-start-width="0.359cm" draw:marker-end="Arrowheads_20_3" draw:marker-end-width="0.459cm" draw:fill="none" draw:textarea-vertical-align="middle" fo:padding-top="0.178cm" fo:padding-bottom="0.178cm" fo:padding-left="0.303cm" fo:padding-right="0.303cm" loext:decorative="false"/>
    </style:style>
    <style:style style:name="gr11" style:family="graphic" style:parent-style-name="objectwithoutfill">
      <style:graphic-properties svg:stroke-width="0.106cm" svg:stroke-color="#127622" draw:marker-start-width="0.359cm" draw:marker-end="Arrowheads_20_4" draw:marker-end-width="0.459cm" draw:fill="none" draw:textarea-vertical-align="middle" fo:padding-top="0.178cm" fo:padding-bottom="0.178cm" fo:padding-left="0.303cm" fo:padding-right="0.303cm" loext:decorative="false"/>
    </style:style>
    <style:style style:name="gr12" style:family="graphic" style:parent-style-name="standard">
      <style:graphic-properties draw:textarea-horizontal-align="left" fo:min-height="0cm" fo:min-width="0cm" style:writing-mode="lr-tb" loext:decorative="false"/>
      <style:paragraph-properties style:writing-mode="lr-tb"/>
    </style:style>
    <style:style style:name="gr13" style:family="graphic" style:parent-style-name="objectwithoutfill">
      <style:graphic-properties svg:stroke-width="0.106cm" draw:marker-start-width="0.359cm" draw:marker-end="Arrowheads_20_5" draw:marker-end-width="0.459cm" draw:fill="none" draw:textarea-vertical-align="middle" fo:padding-top="0.178cm" fo:padding-bottom="0.178cm" fo:padding-left="0.303cm" fo:padding-right="0.303cm" loext:decorative="false"/>
    </style:style>
    <style:style style:name="gr14" style:family="graphic" style:parent-style-name="objectwithoutfill">
      <style:graphic-properties svg:stroke-width="0.106cm" draw:marker-start-width="0.359cm" draw:marker-end="Arrowheads_20_6" draw:marker-end-width="0.459cm" draw:fill="none" draw:textarea-vertical-align="middle" fo:padding-top="0.178cm" fo:padding-bottom="0.178cm" fo:padding-left="0.303cm" fo:padding-right="0.303cm" loext:decorative="false"/>
    </style:style>
    <style:style style:name="P1" style:family="paragraph">
      <style:paragraph-properties fo:text-align="start"/>
      <style:text-properties fo:color="#ff8000" loext:opacity="100%" fo:font-size="10pt"/>
    </style:style>
    <style:style style:name="P2" style:family="paragraph">
      <loext:graphic-properties draw:fill="none"/>
      <style:paragraph-properties fo:text-align="start" style:writing-mode="lr-tb"/>
      <style:text-properties fo:color="#ff8000" loext:opacity="100%" fo:font-size="10pt"/>
    </style:style>
    <style:style style:name="P3" style:family="paragraph">
      <style:paragraph-properties fo:text-align="center"/>
      <style:text-properties style:font-name="Gabriela Nerd Font1" fo:font-size="12pt"/>
    </style:style>
    <style:style style:name="P4" style:family="paragraph">
      <style:paragraph-properties fo:text-align="center" style:writing-mode="lr-tb"/>
      <style:text-properties style:font-name="Gabriela Nerd Font1" fo:font-size="12pt"/>
    </style:style>
    <style:style style:name="P5" style:family="paragraph">
      <loext:graphic-properties draw:fill="none"/>
      <style:paragraph-properties fo:text-align="center"/>
    </style:style>
    <style:style style:name="P6" style:family="paragraph">
      <style:paragraph-properties style:writing-mode="lr-tb"/>
    </style:style>
    <style:style style:name="P7" style:family="paragraph">
      <style:paragraph-properties fo:text-align="start"/>
    </style:style>
    <style:style style:name="P8" style:family="paragraph">
      <style:paragraph-properties fo:text-align="start" style:writing-mode="lr-tb"/>
    </style:style>
    <style:style style:name="T1" style:family="text">
      <style:text-properties fo:color="#127622" loext:opacity="100%"/>
    </style:style>
    <style:style style:name="T2" style:family="text">
      <style:text-properties style:text-position="super 58%"/>
    </style:style>
    <style:style style:name="T3" style:family="text">
      <style:text-properties fo:background-color="#fff5ce"/>
    </style:style>
    <style:style style:name="T4" style:family="text">
      <style:text-properties fo:color="#ff8000" loext:opacity="100%" fo:font-size="10pt"/>
    </style:style>
    <style:style style:name="T5" style:family="text">
      <style:text-properties fo:color="#ff8000" loext:opacity="100%" style:text-position="super 58%" fo:font-size="10pt"/>
    </style:style>
    <style:style style:name="T6" style:family="text">
      <style:text-properties style:font-name="Gabriela Nerd Font1"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xml:id="id8" draw:id="id8" draw:layer="layout" svg:width="10.16cm" svg:height="14.447cm" svg:x="4.088cm" svg:y="2.782cm">
            <text:p>There is Heman the Kohathite and Heman the Ezrahite (Psa 88:1) and they do not appear to be the same man.</text:p>
            <text:p/>
            <text:p><text:span text:style-name="T1">1 Chronicles 6:31-38</text:span></text:p>
            <text:p><text:span text:style-name="T2">31</text:span> And these are they whom <text:span text:style-name="T3">David set over the service of song in the house of the LORD</text:span>, after that the ark had rest. </text:p>
            <text:p><text:span text:style-name="T2">32</text:span> And they ministered before the dwelling place of the tabernacle of the congregation with singing, until Solomon had built the house of the LORD in Jerusalem: and then they waited on their office according to their order. </text:p>
            <text:p><text:span text:style-name="T2">33</text:span> And these are they that waited with their children. Of the sons of the <text:span text:style-name="T3">Kohathites</text:span>: <text:span text:style-name="T3">Heman</text:span> a singer, the son of Joel, the son of Shemuel, </text:p>
            <text:p><text:span text:style-name="T2">34</text:span> The son of Elkanah, the son of Jeroham, the son of Eliel, the son of Toah, </text:p>
            <text:p><text:span text:style-name="T2">35</text:span> The son of Zuph, the son of Elkanah, the son of Mahath, the son of Amasai, </text:p>
            <text:p><text:span text:style-name="T2">36</text:span> The son of Elkanah, the son of Joel, the son of Azariah, the son of Zephaniah, </text:p>
            <text:p><text:span text:style-name="T2">37</text:span> The son of Tahath, the son of Assir, the son of Ebiasaph, the son of Korah, </text:p>
            <text:p><text:span text:style-name="T2">38</text:span> The son of Izhar, the son of Kohath, the son of Levi, the son of Israel.</text:p>
            <draw:enhanced-geometry svg:viewBox="0 0 21600 21600" draw:type="rectangle" draw:enhanced-path="M 0 0 L 21600 0 21600 21600 0 21600 0 0 Z N"/>
          </draw:custom-shape>
          <draw:custom-shape draw:style-name="gr3" draw:text-style-name="P2" draw:layer="layout" svg:width="3.171cm" svg:height="25.248cm" svg:x="52.192cm" svg:y="60.87cm">
            <text:p text:style-name="P1"><text:span text:style-name="T4">Not to be </text:span><text:span text:style-name="T4">confused </text:span><text:span text:style-name="T4">with Jehu the </text:span><text:span text:style-name="T4">son of </text:span><text:span text:style-name="T4">Jehoshaphat </text:span><text:span text:style-name="T4">the son of </text:span><text:span text:style-name="T4">Nimshi (10</text:span><text:span text:style-name="T5">th</text:span><text:span text:style-name="T4"> </text:span><text:span text:style-name="T4">king of </text:span><text:span text:style-name="T4">Israel)</text:span></text:p>
            <text:p text:style-name="P1"><text:span text:style-name="T4">2Ki 9:2,3,14 </text:span><text:span text:style-name="T4">10:30</text:span></text:p>
            <text:p text:style-name="P1"><text:span text:style-name="T4">1Ki 19:16</text:span></text:p>
            <text:p text:style-name="P1"><text:span text:style-name="T4">(see chart of </text:span><text:span text:style-name="T4">Kings of </text:span><text:span text:style-name="T4">Judah and </text:span><text:span text:style-name="T4">Israel)</text:span></text:p>
            <text:p text:style-name="P1"><text:span text:style-name="T4"/></text:p>
            <text:p text:style-name="P1"><text:span text:style-name="T4">or</text:span></text:p>
            <text:p text:style-name="P1"><text:span text:style-name="T4"/></text:p>
            <text:p text:style-name="P1"><text:span text:style-name="T4">Jehu the son </text:span><text:span text:style-name="T4">of Nadab the </text:span><text:span text:style-name="T4">son of Onam </text:span><text:span text:style-name="T4">the son of </text:span><text:span text:style-name="T4">Jarahmeel </text:span><text:span text:style-name="T4">the son of </text:span><text:span text:style-name="T4">Hezron </text:span><text:span text:style-name="T4">(Judahite)</text:span></text:p>
            <text:p text:style-name="P1"><text:span text:style-name="T4">1Ch </text:span><text:span text:style-name="T4">2:9,26,28,37</text:span></text:p>
            <text:p text:style-name="P1"><text:span text:style-name="T4">(see chart of </text:span><text:span text:style-name="T4">1 Chronicles </text:span><text:span text:style-name="T4">2)</text:span></text:p>
            <text:p text:style-name="P1"><text:span text:style-name="T4"/></text:p>
            <text:p text:style-name="P1"><text:span text:style-name="T4">or (probably)</text:span></text:p>
            <text:p text:style-name="P1"><text:span text:style-name="T4"/></text:p>
            <text:p text:style-name="P1"><text:span text:style-name="T4">Jehu the son </text:span><text:span text:style-name="T4">of Josibiah </text:span><text:span text:style-name="T4">the son of </text:span><text:span text:style-name="T4">Simeon</text:span></text:p>
            <text:p text:style-name="P1"><text:span text:style-name="T4">1Ch 4:35</text:span></text:p>
            <text:p text:style-name="P1"><text:span text:style-name="T4"/></text:p>
            <text:p text:style-name="P1"><text:span text:style-name="T4">or (probably)</text:span></text:p>
            <text:p text:style-name="P1"><text:span text:style-name="T4"/></text:p>
            <text:p text:style-name="P1"><text:span text:style-name="T4">Jehu the </text:span><text:span text:style-name="T4">Antothite </text:span><text:span text:style-name="T4">(David’s </text:span><text:span text:style-name="T4">mighty men)</text:span></text:p>
            <text:p text:style-name="P1"><text:span text:style-name="T4">1Ch 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2" draw:layer="layout" svg:width="3.171cm" svg:height="7.833cm" svg:x="52.192cm" svg:y="52.146cm">
            <text:p text:style-name="P1"><text:span text:style-name="T4">Not to be </text:span><text:span text:style-name="T4">confused </text:span><text:span text:style-name="T4">with </text:span><text:span text:style-name="T4">Hanani in </text:span><text:span text:style-name="T4">Ezr 10:20, </text:span><text:span text:style-name="T4">Neh 1:2, </text:span><text:span text:style-name="T4">7:2, 12:36 </text:span><text:span text:style-name="T4">(wrong </text:span><text:span text:style-name="T4">time </text:span><text:span text:style-name="T4">period; </text:span><text:span text:style-name="T4">~18+ </text:span><text:span text:style-name="T4">generatio</text:span><text:span text:style-name="T4">ns lat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4" xml:id="id2" draw:id="id2" draw:layer="layout" svg:width="2.54cm" svg:height="2.54cm" svg:x="52.509cm" svg:y="61.036cm">
            <text:p text:style-name="P3"><text:span text:style-name="T6">Jeh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4" xml:id="id1" draw:id="id1" draw:layer="layout" svg:width="2.54cm" svg:height="2.54cm" svg:x="52.509cm" svg:y="57.226cm">
            <text:p text:style-name="P3"><text:span text:style-name="T6">Hana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6" draw:text-style-name="P5" draw:layer="layout" draw:type="curve" svg:x1="53.779cm" svg:y1="59.766cm" svg:x2="53.779cm" svg:y2="61.036cm" draw:start-shape="id1" draw:start-glue-point="2" draw:end-shape="id2" draw:end-glue-point="0" svg:d="M53779 59766v1270" svg:viewBox="0 0 1 1271">
            <text:p/>
          </draw:connector>
          <draw:custom-shape draw:style-name="gr7" draw:text-style-name="P6" xml:id="id3" draw:id="id3" draw:layer="layout" svg:width="12.598cm" svg:height="18.815cm" svg:x="59.514cm" svg:y="39.458cm">
            <text:p>Baasha 3<text:span text:style-name="T2">r</text:span><text:span text:style-name="T2">d</text:span> king of Israel</text:p>
            <text:p><text:span text:style-name="T1"/></text:p>
            <text:p><text:span text:style-name="T1">1</text:span><text:span text:style-name="T1"> </text:span><text:span text:style-name="T1">K</text:span><text:span text:style-name="T1">i</text:span><text:span text:style-name="T1">n</text:span><text:span text:style-name="T1">g</text:span><text:span text:style-name="T1">s</text:span><text:span text:style-name="T1"> </text:span><text:span text:style-name="T1">1</text:span><text:span text:style-name="T1">6</text:span><text:span text:style-name="T1">:</text:span><text:span text:style-name="T1">1</text:span><text:span text:style-name="T1">-</text:span><text:span text:style-name="T1">4</text:span></text:p>
            <text:p><text:span text:style-name="T2">1</text:span> Then the word of the LORD came to <text:span text:style-name="T3">J</text:span><text:span text:style-name="T3">e</text:span><text:span text:style-name="T3">h</text:span><text:span text:style-name="T3">u</text:span><text:span text:style-name="T3"> </text:span><text:span text:style-name="T3">t</text:span><text:span text:style-name="T3">h</text:span><text:span text:style-name="T3">e</text:span><text:span text:style-name="T3"> </text:span><text:span text:style-name="T3">s</text:span><text:span text:style-name="T3">o</text:span><text:span text:style-name="T3">n</text:span><text:span text:style-name="T3"> </text:span><text:span text:style-name="T3">o</text:span><text:span text:style-name="T3">f</text:span><text:span text:style-name="T3"> </text:span><text:span text:style-name="T3">H</text:span><text:span text:style-name="T3">a</text:span><text:span text:style-name="T3">n</text:span><text:span text:style-name="T3">a</text:span><text:span text:style-name="T3">n</text:span><text:span text:style-name="T3">i</text:span><text:span text:style-name="T3"> </text:span><text:span text:style-name="T3">a</text:span><text:span text:style-name="T3">g</text:span><text:span text:style-name="T3">a</text:span><text:span text:style-name="T3">i</text:span><text:span text:style-name="T3">n</text:span><text:span text:style-name="T3">s</text:span><text:span text:style-name="T3">t</text:span><text:span text:style-name="T3"> </text:span><text:span text:style-name="T3">B</text:span><text:span text:style-name="T3">a</text:span><text:span text:style-name="T3">a</text:span><text:span text:style-name="T3">s</text:span><text:span text:style-name="T3">h</text:span><text:span text:style-name="T3">a</text:span>, saying, </text:p>
            <text:p><text:span text:style-name="T2">2</text:span> Forasmuch as I exalted thee out of the dust, and made thee prince over my people Israel; and thou hast walked in the way of Jeroboam, and hast made my people Israel to sin, to provoke me to anger with their sins; </text:p>
            <text:p><text:span text:style-name="T2">3</text:span> Behold, I will take away the posterity of Baasha, and the posterity of his house; and will make thy house like the house of Jeroboam the son of Nebat. </text:p>
            <text:p><text:span text:style-name="T2">4</text:span> Him that dieth of Baasha in the city shall the dogs eat; and him that dieth of his in the fields shall the fowls of the air eat.</text:p>
            <text:p/>
            <text:p><text:span text:style-name="T1">1</text:span><text:span text:style-name="T1"> </text:span><text:span text:style-name="T1">K</text:span><text:span text:style-name="T1">i</text:span><text:span text:style-name="T1">n</text:span><text:span text:style-name="T1">g</text:span><text:span text:style-name="T1">s</text:span><text:span text:style-name="T1"> </text:span><text:span text:style-name="T1">1</text:span><text:span text:style-name="T1">6</text:span><text:span text:style-name="T1">:</text:span><text:span text:style-name="T1">7</text:span></text:p>
            <text:p>And also by the hand of the prophet <text:span text:style-name="T3">J</text:span><text:span text:style-name="T3">e</text:span><text:span text:style-name="T3">h</text:span><text:span text:style-name="T3">u</text:span><text:span text:style-name="T3"> </text:span><text:span text:style-name="T3">t</text:span><text:span text:style-name="T3">h</text:span><text:span text:style-name="T3">e</text:span><text:span text:style-name="T3"> </text:span><text:span text:style-name="T3">s</text:span><text:span text:style-name="T3">o</text:span><text:span text:style-name="T3">n</text:span><text:span text:style-name="T3"> </text:span><text:span text:style-name="T3">o</text:span><text:span text:style-name="T3">f</text:span><text:span text:style-name="T3"> </text:span><text:span text:style-name="T3">H</text:span><text:span text:style-name="T3">a</text:span><text:span text:style-name="T3">n</text:span><text:span text:style-name="T3">a</text:span><text:span text:style-name="T3">n</text:span><text:span text:style-name="T3">i</text:span><text:span text:style-name="T3"> </text:span><text:span text:style-name="T3">c</text:span><text:span text:style-name="T3">a</text:span><text:span text:style-name="T3">m</text:span><text:span text:style-name="T3">e</text:span><text:span text:style-name="T3"> </text:span><text:span text:style-name="T3">t</text:span><text:span text:style-name="T3">h</text:span><text:span text:style-name="T3">e</text:span><text:span text:style-name="T3"> </text:span><text:span text:style-name="T3">w</text:span><text:span text:style-name="T3">o</text:span><text:span text:style-name="T3">r</text:span><text:span text:style-name="T3">d</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L</text:span><text:span text:style-name="T3">O</text:span><text:span text:style-name="T3">R</text:span><text:span text:style-name="T3">D</text:span><text:span text:style-name="T3"> </text:span><text:span text:style-name="T3">a</text:span><text:span text:style-name="T3">g</text:span><text:span text:style-name="T3">a</text:span><text:span text:style-name="T3">i</text:span><text:span text:style-name="T3">n</text:span><text:span text:style-name="T3">s</text:span><text:span text:style-name="T3">t</text:span><text:span text:style-name="T3"> </text:span><text:span text:style-name="T3">B</text:span><text:span text:style-name="T3">a</text:span><text:span text:style-name="T3">a</text:span><text:span text:style-name="T3">s</text:span><text:span text:style-name="T3">h</text:span><text:span text:style-name="T3">a</text:span>, and against his house, even for all the evil that he did in the sight of the LORD, in provoking him to anger with the work of his hands, in being like the house of Jeroboam; and because he killed him.</text:p>
            <text:p/>
            <text:p>Zimri (5<text:span text:style-name="T2">t</text:span><text:span text:style-name="T2">h</text:span> king of Israel)</text:p>
            <text:p/>
            <text:p><text:span text:style-name="T1">1</text:span><text:span text:style-name="T1"> </text:span><text:span text:style-name="T1">K</text:span><text:span text:style-name="T1">i</text:span><text:span text:style-name="T1">n</text:span><text:span text:style-name="T1">g</text:span><text:span text:style-name="T1">s</text:span><text:span text:style-name="T1"> </text:span><text:span text:style-name="T1">1</text:span><text:span text:style-name="T1">6</text:span><text:span text:style-name="T1">:</text:span><text:span text:style-name="T1">1</text:span><text:span text:style-name="T1">2</text:span><text:span text:style-name="T1">-</text:span><text:span text:style-name="T1">1</text:span><text:span text:style-name="T1">3</text:span></text:p>
            <text:p><text:span text:style-name="T2">1</text:span><text:span text:style-name="T2">2</text:span> Thus did Zimri destroy all the house of Baasha, according to the word of the LORD, <text:span text:style-name="T3">w</text:span><text:span text:style-name="T3">h</text:span><text:span text:style-name="T3">i</text:span><text:span text:style-name="T3">c</text:span><text:span text:style-name="T3">h</text:span><text:span text:style-name="T3"> </text:span><text:span text:style-name="T3">h</text:span><text:span text:style-name="T3">e</text:span><text:span text:style-name="T3"> </text:span><text:span text:style-name="T3">s</text:span><text:span text:style-name="T3">p</text:span><text:span text:style-name="T3">a</text:span><text:span text:style-name="T3">k</text:span><text:span text:style-name="T3">e</text:span><text:span text:style-name="T3"> </text:span><text:span text:style-name="T3">a</text:span><text:span text:style-name="T3">g</text:span><text:span text:style-name="T3">a</text:span><text:span text:style-name="T3">i</text:span><text:span text:style-name="T3">n</text:span><text:span text:style-name="T3">s</text:span><text:span text:style-name="T3">t</text:span><text:span text:style-name="T3"> </text:span><text:span text:style-name="T3">B</text:span><text:span text:style-name="T3">a</text:span><text:span text:style-name="T3">a</text:span><text:span text:style-name="T3">s</text:span><text:span text:style-name="T3">h</text:span><text:span text:style-name="T3">a</text:span><text:span text:style-name="T3"> </text:span><text:span text:style-name="T3">b</text:span><text:span text:style-name="T3">y</text:span><text:span text:style-name="T3"> </text:span><text:span text:style-name="T3">J</text:span><text:span text:style-name="T3">e</text:span><text:span text:style-name="T3">h</text:span><text:span text:style-name="T3">u</text:span><text:span text:style-name="T3"> </text:span><text:span text:style-name="T3">t</text:span><text:span text:style-name="T3">h</text:span><text:span text:style-name="T3">e</text:span><text:span text:style-name="T3"> </text:span><text:span text:style-name="T3">p</text:span><text:span text:style-name="T3">r</text:span><text:span text:style-name="T3">o</text:span><text:span text:style-name="T3">p</text:span><text:span text:style-name="T3">h</text:span><text:span text:style-name="T3">e</text:span><text:span text:style-name="T3">t</text:span>, </text:p>
            <text:p><text:span text:style-name="T2">1</text:span><text:span text:style-name="T2">3</text:span> For all the sins of Baasha, and the sins of Elah his son, by which they sinned, and by which they made Israel to sin, in provoking the LORD God of Israel to anger with their vanities.</text:p>
            <draw:enhanced-geometry svg:viewBox="0 0 21600 21600" draw:type="rectangle" draw:enhanced-path="M 0 0 L 21600 0 21600 21600 0 21600 0 0 Z N"/>
          </draw:custom-shape>
          <draw:frame draw:style-name="gr8" draw:text-style-name="P5" draw:layer="layout" svg:width="30.479cm" svg:height="18.097cm" svg:x="19.807cm" svg:y="61.988cm">
            <draw:image xlink:href="Pictures/10000001000006B2000002ED043CE786.png" xlink:type="simple" xlink:show="embed" xlink:actuate="onLoad" draw:mime-type="image/png">
              <text:p/>
            </draw:image>
          </draw:frame>
          <draw:connector draw:style-name="gr9" draw:text-style-name="P5" draw:layer="layout" draw:type="curve" svg:x1="55.049cm" svg:y1="62.306cm" svg:x2="59.514cm" svg:y2="48.865cm" draw:start-shape="id2" draw:start-glue-point="1" draw:end-shape="id3" draw:end-glue-point="3" svg:d="M55049 62306c3349 0 1117-13441 4465-13441" svg:viewBox="0 0 4466 13442">
            <text:p/>
          </draw:connector>
          <draw:custom-shape draw:style-name="gr7" draw:text-style-name="P6" xml:id="id4" draw:id="id4" draw:layer="layout" svg:width="12.564cm" svg:height="9.533cm" svg:x="59.548cm" svg:y="69.873cm">
            <text:p>Jehoshaphat (7<text:span text:style-name="T2">th</text:span> king of Judah, excluding Ishbosheth)</text:p>
            <text:p/>
            <text:p><text:span text:style-name="T1">2 Chronicles 19:1-3</text:span></text:p>
            <text:p><text:span text:style-name="T2">1</text:span> And <text:span text:style-name="T3">Jehoshaphat </text:span><text:span text:style-name="T3">the king of Judah</text:span> returned to his house in peace to Jerusalem. </text:p>
            <text:p><text:span text:style-name="T2">2</text:span> And <text:span text:style-name="T3">Jehu the son </text:span><text:span text:style-name="T3">of Hanani the seer</text:span> went out to meet him, and said to king Jehoshaphat, Shouldest thou help the ungodly, and love them that hate the LORD? therefore is wrath upon thee from before the LORD. </text:p>
            <text:p><text:span text:style-name="T2">3</text:span> Nevertheless there are good things found in thee, in that thou hast taken away the groves out of the land, and hast prepared thine heart to seek God.</text:p>
            <text:p/>
            <text:p><text:span text:style-name="T1">2 Chronicles 20:34</text:span></text:p>
            <text:p>Now the rest of the acts of Jehoshaphat, first and last, behold, they are written in <text:span text:style-name="T3">the book of Jehu </text:span><text:span text:style-name="T3">the son of Hanani</text:span>, who is mentioned in the book of the kings of Israel.</text:p>
            <draw:enhanced-geometry svg:viewBox="0 0 21600 21600" draw:type="rectangle" draw:enhanced-path="M 0 0 L 21600 0 21600 21600 0 21600 0 0 Z N"/>
          </draw:custom-shape>
          <draw:connector draw:style-name="gr10" draw:text-style-name="P5" draw:layer="layout" draw:type="curve" svg:x1="55.049cm" svg:y1="62.306cm" svg:x2="59.548cm" svg:y2="74.639cm" draw:start-shape="id2" draw:start-glue-point="1" draw:end-shape="id4" draw:end-glue-point="3" svg:d="M55049 62306c3375 0 1126 12333 4499 12333" svg:viewBox="0 0 4500 12334">
            <text:p/>
          </draw:connector>
          <draw:custom-shape draw:style-name="gr7" draw:text-style-name="P6" xml:id="id5" draw:id="id5" draw:layer="layout" svg:width="12.573cm" svg:height="9.533cm" svg:x="59.539cm" svg:y="59.396cm">
            <text:p>Asa (6<text:span text:style-name="T2">t</text:span><text:span text:style-name="T2">h</text:span> king of Judah, excluding Ishbosheth)</text:p>
            <text:p/>
            <text:p><text:span text:style-name="T1">2</text:span><text:span text:style-name="T1"> </text:span><text:span text:style-name="T1">C</text:span><text:span text:style-name="T1">h</text:span><text:span text:style-name="T1">r</text:span><text:span text:style-name="T1">o</text:span><text:span text:style-name="T1">n</text:span><text:span text:style-name="T1">i</text:span><text:span text:style-name="T1">c</text:span><text:span text:style-name="T1">l</text:span><text:span text:style-name="T1">e</text:span><text:span text:style-name="T1">s</text:span><text:span text:style-name="T1"> </text:span><text:span text:style-name="T1">1</text:span><text:span text:style-name="T1">6</text:span><text:span text:style-name="T1">:</text:span><text:span text:style-name="T1">7</text:span><text:span text:style-name="T1">-</text:span><text:span text:style-name="T1">1</text:span><text:span text:style-name="T1">0</text:span></text:p>
            <text:p><text:span text:style-name="T2">7</text:span> And at that time <text:span text:style-name="T3">H</text:span><text:span text:style-name="T3">a</text:span><text:span text:style-name="T3">n</text:span><text:span text:style-name="T3">a</text:span><text:span text:style-name="T3">n</text:span><text:span text:style-name="T3">i</text:span><text:span text:style-name="T3"> </text:span><text:span text:style-name="T3">t</text:span><text:span text:style-name="T3">h</text:span><text:span text:style-name="T3">e</text:span><text:span text:style-name="T3"> </text:span><text:span text:style-name="T3">s</text:span><text:span text:style-name="T3">e</text:span><text:span text:style-name="T3">e</text:span><text:span text:style-name="T3">r</text:span><text:span text:style-name="T3"> </text:span><text:span text:style-name="T3">c</text:span><text:span text:style-name="T3">a</text:span><text:span text:style-name="T3">m</text:span><text:span text:style-name="T3">e</text:span><text:span text:style-name="T3"> </text:span><text:span text:style-name="T3">t</text:span><text:span text:style-name="T3">o</text:span><text:span text:style-name="T3"> </text:span><text:span text:style-name="T3">A</text:span><text:span text:style-name="T3">s</text:span><text:span text:style-name="T3">a</text:span><text:span text:style-name="T3"> </text:span><text:span text:style-name="T3">k</text:span><text:span text:style-name="T3">i</text:span><text:span text:style-name="T3">n</text:span><text:span text:style-name="T3">g</text:span><text:span text:style-name="T3"> </text:span><text:span text:style-name="T3">o</text:span><text:span text:style-name="T3">f</text:span><text:span text:style-name="T3"> </text:span><text:span text:style-name="T3">J</text:span><text:span text:style-name="T3">u</text:span><text:span text:style-name="T3">d</text:span><text:span text:style-name="T3">a</text:span><text:span text:style-name="T3">h</text:span>, and said unto him, Because thou hast relied on the king of Syria, and not relied on the LORD thy God, therefore is the host of the king of Syria escaped out of thine hand. </text:p>
            <text:p><text:span text:style-name="T2">8</text:span> Were not the Ethiopians and the Lubims a huge host, with very many chariots and horsemen? yet, because thou didst rely on the LORD, he delivered them into thine hand. </text:p>
            <text:p><text:span text:style-name="T2">9</text:span> For the eyes of the LORD run to and fro throughout the whole earth, to shew himself strong in the behalf of them whose heart is perfect toward him. Herein thou hast done foolishly: therefore from henceforth thou shalt have wars. </text:p>
            <text:p><text:span text:style-name="T2">1</text:span><text:span text:style-name="T2">0</text:span> Then Asa was wroth with the seer, and put him in a prison house; for he was in a rage with him because of this thing. And Asa oppressed some of the people the same time.</text:p>
            <draw:enhanced-geometry svg:viewBox="0 0 21600 21600" draw:type="rectangle" draw:enhanced-path="M 0 0 L 21600 0 21600 21600 0 21600 0 0 Z N"/>
          </draw:custom-shape>
          <draw:connector draw:style-name="gr11" draw:text-style-name="P5" draw:layer="layout" draw:type="curve" svg:x1="55.049cm" svg:y1="58.496cm" svg:x2="59.539cm" svg:y2="64.162cm" draw:start-shape="id1" draw:start-glue-point="1" draw:end-shape="id5" draw:end-glue-point="3" svg:d="M55049 58496c3367 0 1123 5666 4490 5666" svg:viewBox="0 0 4491 5667">
            <text:p/>
          </draw:connector>
          <draw:custom-shape draw:style-name="gr12" draw:text-style-name="P8" xml:id="id7" draw:id="id7" draw:layer="layout" svg:width="12.065cm" svg:height="22.091cm" svg:x="14.896cm" svg:y="17.219cm">
            <text:p text:style-name="P7">To be the same man Hanani would have to have been alive for at least 5 generations (from king David of Judah to Asa king of Judah; see chart of kings of Judah and Israel).</text:p>
            <text:p text:style-name="P7"/>
            <text:p text:style-name="P7"><text:span text:style-name="T1">1 Chronicles 25:1-9,25</text:span></text:p>
            <text:p text:style-name="P7"><text:span text:style-name="T2">1</text:span> Moreover <text:span text:style-name="T3">David</text:span> and the captains of the host <text:span text:style-name="T3">separated</text:span> to the service of the sons of Asaph, and of Heman, and of Jeduthun, <text:span text:style-name="T3">who should prophesy</text:span> with harps, with psalteries, and with cymbals: and the number of the workmen according to their service was: </text:p>
            <text:p text:style-name="P7"><text:span text:style-name="T2">2</text:span> Of the sons of Asaph; Zaccur, and Joseph, and Nethaniah, and Asarelah, the sons of Asaph under the hands of Asaph, which prophesied according to the order of the king. </text:p>
            <text:p text:style-name="P7"><text:span text:style-name="T2">3</text:span> Of Jeduthun: the sons of Jeduthun; Gedaliah, and Zeri, and Jeshaiah, Hashabiah, and Mattithiah, six, under the hands of their father Jeduthun, who prophesied with a harp, to give thanks and to praise the LORD. </text:p>
            <text:p text:style-name="P7"><text:span text:style-name="T2">4</text:span> <text:span text:style-name="T3">Of Heman: the sons of Heman</text:span>; Bukkiah, Mattaniah, Uzziel, Shebuel, and Jerimoth, Hananiah, <text:span text:style-name="T3">Hanani</text:span>, Eliathah, Giddalti, and Romamti-ezer, Joshbekashah, Mallothi, Hothir, and Mahazioth: </text:p>
            <text:p text:style-name="P7"><text:span text:style-name="T2">5</text:span> All these were <text:span text:style-name="T3">the sons of Heman the king's seer</text:span> in the words of God, to lift up the horn. And God gave to Heman fourteen sons and three daughters.</text:p>
            <text:p text:style-name="P7"><text:span text:style-name="T2">6</text:span> <text:span text:style-name="T3">All these were under the hands of their father for song in the house of the LORD</text:span>, with cymbals, psalteries, and harps, for the service of the house of God, according to the king's order to Asaph, Jeduthun, and Heman. </text:p>
            <text:p text:style-name="P7"><text:span text:style-name="T2">7</text:span> So the number of them, with their brethren that were instructed in the songs of the LORD, even all that were cunning, was two hundred fourscore and eight. </text:p>
            <text:p text:style-name="P7"><text:span text:style-name="T2">8</text:span> And they cast lots, ward against ward, as well the small as the great, the teacher as the scholar.</text:p>
            <text:p text:style-name="P7"><text:span text:style-name="T2">9</text:span> Now the first lot came forth for Asaph to Joseph: the second to Gedaliah, who with his brethren and sons were twelve:</text:p>
            <text:p text:style-name="P7"><text:span text:style-name="T2">25</text:span> The eighteenth to <text:span text:style-name="T3">Hanani</text:span>, he, <text:span text:style-name="T3">his sons</text:span>, and his brethren, were twelve:</text:p>
            <draw:enhanced-geometry svg:viewBox="0 0 21600 21600" draw:type="rectangle" draw:enhanced-path="M 0 0 L 21600 0 21600 21600 0 21600 0 0 Z N"/>
          </draw:custom-shape>
          <draw:frame draw:style-name="gr8" draw:text-style-name="P5" xml:id="id6" draw:id="id6" draw:layer="layout" svg:width="4.916cm" svg:height="4.916cm" svg:x="18.463cm" svg:y="42.133cm">
            <draw:image xlink:href="Pictures/10000001000002D0000002D04CA55216.png" xlink:type="simple" xlink:show="embed" xlink:actuate="onLoad" draw:mime-type="image/png">
              <text:p/>
            </draw:image>
            <draw:glue-point draw:id="4" svg:x="3.647cm" svg:y="0.058cm"/>
            <draw:glue-point draw:id="5" svg:x="0.024cm" svg:y="-3.708cm"/>
            <draw:glue-point draw:id="6" svg:x="-0.038cm" svg:y="3.728cm"/>
          </draw:frame>
          <draw:connector draw:style-name="gr13" draw:text-style-name="P5" draw:layer="layout" draw:type="curve" svg:x1="52.509cm" svg:y1="58.496cm" svg:x2="20.903cm" svg:y2="46.423cm" draw:start-shape="id1" draw:start-glue-point="3" draw:end-shape="id6" draw:end-glue-point="6" svg:d="M52509 58496c-21071 0-31606-4024-31606-12073" svg:viewBox="0 0 31607 12074">
            <text:p/>
          </draw:connector>
          <draw:connector draw:style-name="gr14" draw:text-style-name="P5" draw:layer="layout" draw:type="curve" svg:x1="20.932cm" svg:y1="42.769cm" svg:x2="20.928cm" svg:y2="39.31cm" draw:start-shape="id6" draw:start-glue-point="5" draw:end-shape="id7" draw:end-glue-point="2" svg:d="M20932 42769c0-3070-4-1341-4-3459" svg:viewBox="0 0 5 3460">
            <text:p/>
          </draw:connector>
          <draw:connector draw:style-name="gr14" draw:text-style-name="P5" draw:layer="layout" draw:type="curve" svg:x1="14.896cm" svg:y1="28.264cm" svg:x2="9.168cm" svg:y2="17.229cm" draw:start-shape="id7" draw:start-glue-point="3" draw:end-shape="id8" draw:end-glue-point="2" svg:d="M14896 28264c-3819 0-5728-3678-5728-11035" svg:viewBox="0 0 5729 11036">
            <text:p/>
          </draw:connector>
          <draw:custom-shape draw:style-name="gr2" xml:id="id9" draw:id="id9" draw:layer="layout" svg:width="11.112cm" svg:height="10.625cm" svg:x="27.448cm" svg:y="39.327cm">
            <text:p>13<text:span text:style-name="T2">th</text:span> generations after king David during the reign of king Hezekiah of Judah we see the sons of Heman serving the house of the LORD.</text:p>
            <text:p/>
            <text:p><text:span text:style-name="T1">2 Chronicles 29:12-15</text:span></text:p>
            <text:p><text:span text:style-name="T2">12</text:span> Then the Levites arose, Mahath the son of Amasai, and Joel the son of Azariah, of the sons of the Kohathites: and of the sons of Merari, Kish the son of Abdi, and Azariah the son of Jehalelel: and of the Gershonites; Joah the son of Zimmah, and Eden the son of Joah: </text:p>
            <text:p><text:span text:style-name="T2">13</text:span> And of the sons of Elizaphan; Shimri, and Jeiel: and of the sons of Asaph; Zechariah, and Mattaniah: </text:p>
            <text:p><text:span text:style-name="T2">14</text:span> And of <text:span text:style-name="T3">the sons of Heman</text:span>; Jehiel, and Shimei: and of the sons of Jeduthun; Shemaiah, and Uzziel. </text:p>
            <text:p><text:span text:style-name="T2">15</text:span> And they gathered their brethren, and sanctified themselves, and came, according to the commandment of the king, by the words of the LORD, to cleanse the house of the LORD.</text:p>
            <draw:enhanced-geometry svg:viewBox="0 0 21600 21600" draw:type="rectangle" draw:enhanced-path="M 0 0 L 21600 0 21600 21600 0 21600 0 0 Z N"/>
          </draw:custom-shape>
          <draw:connector draw:style-name="gr14" draw:text-style-name="P5" draw:layer="layout" draw:type="curve" svg:x1="26.961cm" svg:y1="28.264cm" svg:x2="33.004cm" svg:y2="39.327cm" draw:start-shape="id7" draw:start-glue-point="1" draw:end-shape="id9" draw:end-glue-point="0" svg:d="M26961 28264c4029 0 6043 3687 6043 11063" svg:viewBox="0 0 6044 11064">
            <text:p/>
          </draw:connector>
          <draw:custom-shape draw:style-name="gr2" xml:id="id10" draw:id="id10" draw:layer="layout" svg:width="9.525cm" svg:height="6.803cm" svg:x="39.144cm" svg:y="49.977cm">
            <text:p>3 generations after king Hezekiah of Judah, during the reign of king Josiah of Judah, celebrating passover.</text:p>
            <text:p/>
            <text:p><text:span text:style-name="T1">2 Chronicles 35:15</text:span></text:p>
            <text:p>And the singers the sons of Asaph were in their place, according to the commandment of David, and Asaph, and <text:span text:style-name="T3">Heman</text:span>, and Jeduthun the king's seer; and the porters waited at every gate; they might not depart from their service; for their brethren the Levites prepared for them.</text:p>
            <draw:enhanced-geometry svg:viewBox="0 0 21600 21600" draw:type="rectangle" draw:enhanced-path="M 0 0 L 21600 0 21600 21600 0 21600 0 0 Z N"/>
          </draw:custom-shape>
          <draw:connector draw:style-name="gr14" draw:text-style-name="P5" draw:layer="layout" draw:type="curve" svg:x1="38.56cm" svg:y1="44.639cm" svg:x2="43.906cm" svg:y2="49.977cm" draw:start-shape="id9" draw:start-glue-point="1" draw:end-shape="id10" draw:end-glue-point="0" svg:d="M38560 44639c3564 0 5346 1779 5346 5338" svg:viewBox="0 0 5347 5339">
            <text:p/>
          </draw:connector>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Gabriela Nerd Font" svg:font-family="'Gabriela Nerd Font'" style:font-adornments="Regular" style:font-pitch="variable"/>
    <style:font-face style:name="Gabriela Nerd Font1" svg:font-family="'Gabriela Nerd 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abriela Nerd Font" fo:font-family="'Gabriela Nerd Font'" style:font-style-name="Regular"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76.2cm" fo:page-height="88.9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15T10:53:56.930828500</meta:creation-date>
    <dc:date>2025-07-16T11:09:32.140531700</dc:date>
    <meta:editing-duration>PT3H17M27S</meta:editing-duration>
    <meta:editing-cycles>60</meta:editing-cycles>
    <meta:generator>LibreOffice/25.2.4.3$Windows_X86_64 LibreOffice_project/33e196637044ead23f5c3226cde09b47731f7e27</meta:generator>
    <meta:print-date>2025-07-15T13:23:20.222778100</meta:print-date>
    <meta:printed-by>PDF files</meta:printed-by>
    <dc:title>Hanani &amp; Jehu the seers</dc:title>
    <meta:document-statistic meta:object-count="23"/>
  </office:meta>
</office:document-meta>
</file>