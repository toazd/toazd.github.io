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withoutfill">
      <style:graphic-properties svg:stroke-width="0.1cm" svg:stroke-color="#ff0000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2.042cm" fo:min-width="2.3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ec9ba4" draw:textarea-horizontal-align="justify" draw:textarea-vertical-align="middle" draw:auto-grow-height="false" fo:min-height="2.042cm" fo:min-width="2.3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1cm" svg:stroke-color="#800080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6" style:family="graphic" style:parent-style-name="standard">
      <style:graphic-properties draw:fill="solid" draw:fill-color="#ec9ba4" draw:textarea-horizontal-align="justify" draw:textarea-vertical-align="middle" draw:auto-grow-height="false" fo:min-height="2.042cm" fo:min-width="2.633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ec9ba4" draw:textarea-horizontal-align="justify" draw:textarea-vertical-align="middle" draw:auto-grow-height="false" fo:min-height="2.042cm" fo:min-width="2.479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 style:writing-mode="lr-tb"/>
      <style:text-properties fo:font-size="12pt"/>
    </style:style>
    <style:style style:name="P4" style:family="paragraph">
      <loext:graphic-properties draw:fill="solid" draw:fill-color="#ec9ba4"/>
      <style:paragraph-properties fo:text-align="center" style:writing-mode="lr-tb"/>
      <style:text-properties fo:font-size="12pt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onnector draw:style-name="gr2" draw:text-style-name="P1" draw:layer="layout" draw:type="curve" svg:x1="13.748cm" svg:y1="13.843cm" svg:x2="13.743cm" svg:y2="15.602cm" draw:start-shape="id1" draw:start-glue-point="0" draw:end-shape="id2" draw:end-glue-point="0" svg:d="M13748 13843c0 1356-5 477-5 1759" svg:viewBox="0 0 6 1760">
            <text:p/>
          </draw:connector>
          <draw:connector draw:style-name="gr2" draw:text-style-name="P1" draw:layer="layout" draw:type="curve" svg:x1="7.837cm" svg:y1="11.069cm" svg:x2="9.852cm" svg:y2="15.602cm" draw:start-shape="id3" draw:start-glue-point="0" draw:end-shape="id4" draw:end-glue-point="0" svg:d="M7837 11069c0 3436 2015 1170 2015 4533" svg:viewBox="0 0 2016 4534">
            <text:p/>
          </draw:connector>
          <draw:custom-shape draw:style-name="gr3" draw:text-style-name="P3" xml:id="id5" draw:id="id5" draw:layer="layout" svg:width="3.048cm" svg:height="2.54cm" svg:x="8.125cm" svg:y="9.799cm">
            <text:p text:style-name="P2"><text:span text:style-name="T1">I</text:span><text:span text:style-name="T1">s</text:span><text:span text:style-name="T1">r</text:span><text:span text:style-name="T1">a</text:span><text:span text:style-name="T1">e</text:span><text:span text:style-name="T1">l</text:span></text:p>
            <text:p text:style-name="P2"><text:span text:style-name="T2">1</text:span><text:span text:style-name="T2">C</text:span><text:span text:style-name="T2">h</text:span><text:span text:style-name="T2"> </text:span><text:span text:style-name="T2">2</text:span><text:span text:style-name="T2">:</text:span><text:span text:style-name="T2">1</text:span></text:p>
            <text:p text:style-name="P2"><text:span text:style-name="T1">J</text:span><text:span text:style-name="T1">a</text:span><text:span text:style-name="T1">c</text:span><text:span text:style-name="T1">o</text:span><text:span text:style-name="T1">b</text:span></text:p>
            <text:p text:style-name="P2"><text:span text:style-name="T3">G</text:span><text:span text:style-name="T3">e</text:span><text:span text:style-name="T3">n</text:span><text:span text:style-name="T3"> </text:span><text:span text:style-name="T3">3</text:span><text:span text:style-name="T3">5</text:span><text:span text:style-name="T3">:</text:span><text:span text:style-name="T3">1</text:span><text:span text:style-name="T3">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" draw:text-style-name="P3" xml:id="id4" draw:id="id4" draw:layer="layout" svg:width="3.048cm" svg:height="2.54cm" svg:x="8.328cm" svg:y="15.602cm">
            <text:p text:style-name="P2"><text:span text:style-name="T1">Judah</text:span></text:p>
            <text:p text:style-name="P2"><text:span text:style-name="T2">1Ch 2:1</text:span></text:p>
            <text:p text:style-name="P2"><text:span text:style-name="T2">Gen 29:3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4" draw:text-style-name="P4" xml:id="id6" draw:id="id6" draw:layer="layout" svg:width="3.048cm" svg:height="2.54cm" svg:x="4.502cm" svg:y="9.799cm">
            <text:p text:style-name="P2"><text:span text:style-name="T1">Leah</text:span></text:p>
            <text:p text:style-name="P2"><text:span text:style-name="T2">Gen 29:3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" draw:text-style-name="P1" xml:id="id3" draw:id="id3" draw:layer="layout" draw:type="curve" svg:x1="8.125cm" svg:y1="11.069cm" svg:x2="7.55cm" svg:y2="11.069cm" draw:start-shape="id5" draw:start-glue-point="3" draw:end-shape="id6" draw:end-glue-point="1" svg:d="M8125 11069h-575" svg:viewBox="0 0 576 1">
            <text:p/>
          </draw:connector>
          <draw:custom-shape draw:style-name="gr6" draw:text-style-name="P4" xml:id="id2" draw:id="id2" draw:layer="layout" svg:width="3.381cm" svg:height="2.54cm" svg:x="12.053cm" svg:y="15.602cm">
            <text:p text:style-name="P2"><text:span text:style-name="T1">Unnamed</text:span></text:p>
            <text:p text:style-name="P2"><text:span text:style-name="T4">Canaanitess</text:span></text:p>
            <text:p text:style-name="P2"><text:span text:style-name="T2">Gen 38:2,12</text:span></text:p>
            <text:p text:style-name="P2"><text:span text:style-name="T2">1Ch 2: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" draw:text-style-name="P1" draw:layer="layout" draw:type="curve" svg:x1="12.053cm" svg:y1="16.872cm" svg:x2="11.376cm" svg:y2="16.872cm" draw:start-shape="id2" draw:start-glue-point="3" draw:end-shape="id4" draw:end-glue-point="1" svg:d="M12053 16872h-677" svg:viewBox="0 0 678 1">
            <text:p/>
          </draw:connector>
          <draw:custom-shape draw:style-name="gr3" draw:text-style-name="P3" xml:id="id7" draw:id="id7" draw:layer="layout" svg:width="3.048cm" svg:height="2.54cm" svg:x="14.041cm" svg:y="12.573cm">
            <text:p text:style-name="P2"><text:span text:style-name="T1">Shuah</text:span></text:p>
            <text:p text:style-name="P2"><text:span text:style-name="T4">Canaanite</text:span></text:p>
            <text:p text:style-name="P2"><text:span text:style-name="T2">Gen 38:2,1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7" draw:text-style-name="P4" xml:id="id8" draw:id="id8" draw:layer="layout" svg:width="3.227cm" svg:height="2.54cm" svg:x="10.229cm" svg:y="12.573cm">
            <text:p text:style-name="P2"><text:span text:style-name="T1">Shua</text:span></text:p>
            <text:p text:style-name="P2"><text:span text:style-name="T4">Canaanitess</text:span></text:p>
            <text:p text:style-name="P2"><text:span text:style-name="T2">1Ch 2: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" draw:text-style-name="P1" xml:id="id1" draw:id="id1" draw:layer="layout" draw:type="curve" svg:x1="14.041cm" svg:y1="13.843cm" svg:x2="13.456cm" svg:y2="13.843cm" draw:start-shape="id7" draw:start-glue-point="3" draw:end-shape="id8" draw:end-glue-point="1" svg:d="M14041 13843h-585" svg:viewBox="0 0 586 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9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07T17:19:55.876701400</meta:creation-date>
    <dc:date>2026-02-07T17:33:25.998264800</dc:date>
    <meta:editing-duration>PT13M26S</meta:editing-duration>
    <meta:editing-cycles>10</meta:editing-cycles>
    <meta:generator>LibreOffice/25.8.4.2$Windows_X86_64 LibreOffice_project/290daaa01b999472f0c7a3890eb6a550fd74c6df</meta:generator>
    <meta:document-statistic meta:object-count="12"/>
  </office:meta>
</office:document-meta>
</file>