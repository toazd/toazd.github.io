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Gabriela" svg:font-family="Gabriela" style:font-adornments="Regular" style:font-pitch="variable"/>
    <style:font-face style:name="Gabriela1" svg:font-family="Gabrie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draw:stroke="dash" draw:stroke-dash="Dot" svg:stroke-width="0.106cm" svg:stroke-color="#ff0000" draw:marker-start-width="0.359cm" draw:marker-end-width="0.359cm" svg:stroke-linecap="butt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standard">
      <style:graphic-properties svg:stroke-color="#ff8000" draw:fill="none" loext:fill-use-slide-background="false" draw:textarea-horizontal-align="left" draw:textarea-vertical-align="middle" draw:auto-grow-height="false" fo:min-height="3.961cm" fo:min-width="7.7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18cm" svg:stroke-color="#3465a4" draw:marker-start-width="0.227cm" draw:marker-end-width="0.227cm" draw:textarea-horizontal-align="justify" draw:textarea-vertical-align="middle" draw:auto-grow-height="false" fo:min-height="1.936cm" fo:min-width="2.194cm" fo:padding-top="0.134cm" fo:padding-bottom="0.134cm" fo:padding-left="0.259cm" fo:padding-right="0.259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42cm" fo:min-width="2.7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18cm" svg:stroke-color="#3465a4" draw:marker-start-width="0.227cm" draw:marker-end-width="0.227cm" draw:fill="solid" draw:fill-color="#ffa6a6" draw:textarea-horizontal-align="justify" draw:textarea-vertical-align="middle" draw:auto-grow-height="false" fo:min-height="2.242cm" fo:min-width="2.75cm" fo:padding-top="0.034cm" fo:padding-bottom="0.034cm" fo:padding-left="0.034cm" fo:padding-right="0.034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06cm" svg:stroke-color="#80008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694cm" fo:min-width="2.702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18cm" svg:stroke-color="#3465a4" draw:marker-start-width="0.227cm" draw:marker-end-width="0.227cm" draw:fill="solid" draw:fill-color="#ffa6a6" draw:textarea-horizontal-align="justify" draw:textarea-vertical-align="middle" draw:auto-grow-height="false" fo:min-height="2.224cm" fo:min-width="2.732cm" fo:padding-top="0.034cm" fo:padding-bottom="0.034cm" fo:padding-left="0.034cm" fo:padding-right="0.034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solid" draw:stroke-dash="Dot" svg:stroke-width="0.106cm" svg:stroke-color="#ff0000" draw:marker-start-width="0.359cm" draw:marker-end-width="0.359cm" svg:stroke-linecap="butt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svg:stroke-width="0.035cm" svg:stroke-color="#ff8000" draw:marker-start-width="0.252cm" draw:marker-end-width="0.252cm" draw:textarea-horizontal-align="justify" draw:textarea-vertical-align="middle" draw:auto-grow-height="false" fo:min-height="2.242cm" fo:min-width="2.75cm" fo:padding-top="0.042cm" fo:padding-bottom="0.042cm" fo:padding-left="0.042cm" fo:padding-right="0.042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800080" draw:marker-start-width="0.252cm" draw:marker-end-width="0.252cm" draw:textarea-horizontal-align="justify" draw:textarea-vertical-align="middle" draw:auto-grow-height="false" fo:min-height="2.242cm" fo:min-width="2.75cm" fo:padding-top="0.042cm" fo:padding-bottom="0.042cm" fo:padding-left="0.042cm" fo:padding-right="0.042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cm" svg:stroke-color="#3465a4" draw:marker-start-width="0.2cm" draw:marker-end-width="0.2cm" draw:fill="solid" draw:fill-color="#ffa6a6" draw:textarea-horizontal-align="justify" draw:textarea-vertical-align="middle" draw:auto-grow-height="false" fo:min-height="2.224cm" fo:min-width="2.732cm" fo:padding-top="0.025cm" fo:padding-bottom="0.025cm" fo:padding-left="0.025cm" fo:padding-right="0.025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ff8000" draw:fill="none" loext:fill-use-slide-background="false" draw:textarea-horizontal-align="right" draw:textarea-vertical-align="middle" draw:auto-grow-height="false" fo:min-height="2.809cm" fo:min-width="13.888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b2b2b2" draw:textarea-horizontal-align="justify" draw:textarea-vertical-align="middle" draw:auto-grow-height="false" fo:min-height="2.242cm" fo:min-width="2.75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cm" svg:stroke-color="#3465a4" draw:marker-start-width="0.2cm" draw:marker-end-width="0.2cm" draw:fill="solid" draw:fill-color="#ffa6a6" draw:textarea-horizontal-align="justify" draw:textarea-vertical-align="middle" draw:auto-grow-height="false" fo:min-height="2.242cm" fo:min-width="2.75cm" fo:padding-top="0.025cm" fo:padding-bottom="0.025cm" fo:padding-left="0.025cm" fo:padding-right="0.025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ff8000" draw:fill="none" loext:fill-use-slide-background="false" draw:textarea-horizontal-align="right" draw:textarea-vertical-align="middle" draw:auto-grow-height="false" fo:min-height="2.594cm" fo:min-width="7.879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3.954cm" fo:min-width="2.702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ff8000" draw:fill="none" loext:fill-use-slide-background="false" draw:textarea-horizontal-align="right" draw:textarea-vertical-align="middle" draw:auto-grow-height="false" fo:min-height="4.138cm" fo:min-width="8.118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ff8000" draw:fill="none" loext:fill-use-slide-background="false" draw:textarea-horizontal-align="left" draw:textarea-vertical-align="middle" draw:auto-grow-height="false" fo:min-height="2.594cm" fo:min-width="12.096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0000" draw:textarea-horizontal-align="justify" draw:textarea-vertical-align="middle" draw:auto-grow-height="false" fo:min-height="2.242cm" fo:min-width="2.75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ff8000" draw:fill="none" loext:fill-use-slide-background="false" draw:textarea-horizontal-align="right" draw:textarea-vertical-align="middle" draw:auto-grow-height="false" fo:min-height="2.833cm" fo:min-width="20.641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Gabriela1"/>
    </style:style>
    <style:style style:name="P2" style:family="paragraph">
      <style:paragraph-properties fo:text-align="left"/>
      <style:text-properties fo:color="#ff8000" loext:opacity="100%" style:font-name="Gabriela1" fo:font-size="10pt" style:font-size-asian="10pt" style:font-size-complex="10pt"/>
    </style:style>
    <style:style style:name="P3" style:family="paragraph">
      <loext:graphic-properties draw:fill="none"/>
      <style:paragraph-properties fo:text-align="left" style:writing-mode="lr-tb"/>
      <style:text-properties fo:color="#ff8000" loext:opacity="100%" style:font-name="Gabriela1" fo:font-size="10pt" style:font-size-asian="10pt" style:font-size-complex="10pt"/>
    </style:style>
    <style:style style:name="P4" style:family="paragraph">
      <style:paragraph-properties fo:text-align="center"/>
      <style:text-properties style:font-name="Gabriela1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Gabriela1" fo:font-size="12pt" style:font-size-asian="12pt" style:font-size-complex="12pt"/>
    </style:style>
    <style:style style:name="P6" style:family="paragraph">
      <style:paragraph-properties fo:text-align="center" style:writing-mode="lr-tb"/>
      <style:text-properties style:font-name="Gabriela1" fo:font-size="12pt" style:font-size-asian="12pt" style:font-size-complex="12pt"/>
    </style:style>
    <style:style style:name="P7" style:family="paragraph">
      <style:paragraph-properties fo:text-align="center"/>
      <style:text-properties style:font-name="Gabriela1" fo:font-size="12pt" style:text-underline-style="none" style:font-size-asian="12pt" style:font-size-complex="12pt"/>
    </style:style>
    <style:style style:name="P8" style:family="paragraph">
      <style:paragraph-properties fo:text-align="center" style:writing-mode="lr-tb"/>
      <style:text-properties style:font-name="Gabriela1" fo:font-size="12pt" style:text-underline-style="none" style:font-size-asian="12pt" style:font-size-complex="12pt"/>
    </style:style>
    <style:style style:name="P9" style:family="paragraph">
      <loext:graphic-properties draw:fill="solid" draw:fill-color="#ffa6a6"/>
      <style:paragraph-properties fo:text-align="center" style:writing-mode="lr-tb"/>
      <style:text-properties style:font-name="Gabriela1"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Gabriela1" fo:font-size="12pt" style:text-underline-style="none" style:font-size-asian="12pt" style:font-size-complex="12pt"/>
    </style:style>
    <style:style style:name="P11" style:family="paragraph">
      <style:paragraph-properties fo:text-align="right"/>
      <style:text-properties fo:color="#ff8000" loext:opacity="100%" style:font-name="Gabriela1" fo:font-size="10pt" style:font-size-asian="10pt" style:font-size-complex="10pt"/>
    </style:style>
    <style:style style:name="P12" style:family="paragraph">
      <loext:graphic-properties draw:fill="none"/>
      <style:paragraph-properties fo:text-align="right" style:writing-mode="lr-tb"/>
      <style:text-properties fo:color="#ff8000" loext:opacity="100%" style:font-name="Gabriela1" fo:font-size="10pt" style:font-size-asian="10pt" style:font-size-complex="10pt"/>
    </style:style>
    <style:style style:name="P13" style:family="paragraph">
      <loext:graphic-properties draw:fill="solid" draw:fill-color="#b2b2b2"/>
      <style:paragraph-properties fo:text-align="center" style:writing-mode="lr-tb"/>
      <style:text-properties style:font-name="Gabriela1" fo:font-size="12pt" style:text-underline-style="none" style:font-size-asian="12pt" style:font-size-complex="12pt"/>
    </style:style>
    <style:style style:name="T1" style:family="text">
      <style:text-properties fo:color="#ff8000" loext:opacity="100%" style:font-name="Gabriela1" fo:font-size="10pt" style:font-size-asian="10pt" style:font-size-complex="10pt"/>
    </style:style>
    <style:style style:name="T2" style:family="text">
      <style:text-properties style:font-name="Gabriela1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Gabriela1" fo:font-size="10pt" style:font-size-asian="10pt" style:font-size-complex="10pt"/>
    </style:style>
    <style:style style:name="T4" style:family="text">
      <style:text-properties style:font-name="Gabriela1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Gabriela1"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style:font-name="Gabriela1" fo:font-size="10pt" style:text-underline-style="none" style:font-size-asian="10pt" style:font-size-complex="10pt"/>
    </style:style>
    <style:style style:name="T7" style:family="text">
      <style:text-properties style:font-name="Gabriela1" fo:font-size="10pt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fo:color="#729fcf" loext:opacity="100%" style:font-name="Gabriela1" fo:font-size="10pt" style:font-size-asian="10pt" style:font-size-complex="10pt"/>
    </style:style>
    <style:style style:name="T9" style:family="text">
      <style:text-properties fo:color="#ffffff" loext:opacity="100%" style:font-name="Gabriela1" fo:font-size="10pt" style:font-size-asian="10pt" style:font-size-complex="10pt"/>
    </style:style>
    <style:style style:name="T10" style:family="text">
      <style:text-properties fo:color="#ff8000" loext:opacity="100%" style:font-name="Gabriela1" fo:font-size="10pt" fo:background-color="#666666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42.67cm" svg:y1="47.457cm" svg:x2="37.449cm" svg:y2="47.263cm" draw:start-shape="id1" draw:start-glue-point="0" svg:d="M42670 47457c0-751-5221-654-5221-194" svg:viewBox="0 0 5222 553">
          <text:p/>
        </draw:connector>
        <draw:connector draw:style-name="gr2" draw:text-style-name="P1" draw:layer="layout" draw:type="curve" svg:x1="12.811cm" svg:y1="41.01cm" svg:x2="21.505cm" svg:y2="43.451cm" draw:start-shape="id2" draw:start-glue-point="2" draw:end-shape="id3" draw:end-glue-point="0" svg:d="M12811 41010c0 1831 8694 611 8694 2441" svg:viewBox="0 0 8695 2442">
          <text:p/>
        </draw:connector>
        <draw:connector draw:style-name="gr1" draw:text-style-name="P1" draw:layer="layout" draw:type="curve" svg:x1="23.64cm" svg:y1="44.721cm" svg:x2="23.648cm" svg:y2="47.452cm" draw:start-shape="id4" draw:start-glue-point="0" draw:end-shape="id5" draw:end-glue-point="0" svg:d="M23640 44721c0 2088 8 723 8 2731" svg:viewBox="0 0 9 2732">
          <text:p/>
        </draw:connector>
        <draw:connector draw:style-name="gr1" draw:text-style-name="P1" draw:layer="layout" draw:type="curve" svg:x1="30.074cm" svg:y1="38.452cm" svg:x2="35.027cm" svg:y2="14.243cm" draw:start-shape="id6" draw:start-glue-point="0" draw:end-shape="id7" draw:end-glue-point="0" svg:d="M30074 38452c0-16140 1651-24209 4953-24209" svg:viewBox="0 0 4954 24210">
          <text:p/>
        </draw:connector>
        <draw:connector draw:style-name="gr1" draw:text-style-name="P1" draw:layer="layout" draw:type="curve" svg:x1="33.605cm" svg:y1="38.467cm" svg:x2="35.027cm" svg:y2="14.243cm" draw:start-shape="id8" draw:start-glue-point="0" draw:end-shape="id7" draw:end-glue-point="0" svg:d="M33605 38467c0-16150 474-24224 1422-24224" svg:viewBox="0 0 1423 24225">
          <text:p/>
        </draw:connector>
        <draw:connector draw:style-name="gr1" draw:text-style-name="P1" draw:layer="layout" draw:type="curve" svg:x1="26.574cm" svg:y1="38.452cm" svg:x2="35.027cm" svg:y2="14.243cm" draw:start-shape="id9" draw:start-glue-point="0" draw:end-shape="id7" draw:end-glue-point="0" svg:d="M26574 38452c0-16140 2817-24209 8453-24209" svg:viewBox="0 0 8454 24210">
          <text:p/>
        </draw:connector>
        <draw:connector draw:style-name="gr1" draw:text-style-name="P1" draw:layer="layout" draw:type="curve" svg:x1="42.347cm" svg:y1="6.397cm" svg:x2="42.349cm" svg:y2="3.941cm" draw:start-shape="id10" draw:start-glue-point="0" draw:end-shape="id11" draw:end-glue-point="0" svg:d="M42347 6397c0-1801 2-574 2-2456" svg:viewBox="0 0 3 2457">
          <text:p/>
        </draw:connector>
        <draw:custom-shape draw:style-name="gr3" draw:text-style-name="P3" draw:layer="layout" svg:width="8.213cm" svg:height="4.445cm" svg:x="12.872cm" svg:y="14.1cm">
          <text:p text:style-name="P2"><text:span text:style-name="T1">Num 1:7 (son of Judah)</text:span></text:p>
          <text:p text:style-name="P2"><text:span text:style-name="T1">or</text:span></text:p>
          <text:p text:style-name="P2"><text:span text:style-name="T1">1Ch 6:22 (son of Levi)</text:span></text:p>
          <text:p text:style-name="P2"><text:span text:style-name="T1"/></text:p>
          <text:p text:style-name="P2"><text:span text:style-name="T1">Lev 21:7,10 (high priest)</text:span></text:p>
          <text:p text:style-name="P2"><text:span text:style-name="T1">“of his own people”</text:span></text:p>
          <text:p text:style-name="P2"><text:span text:style-name="T1"/></text:p>
          <text:p text:style-name="P2"><text:span text:style-name="T1">Eze 44:22 (any priest)</text:span></text:p>
          <text:p text:style-name="P2"><text:span text:style-name="T1">“seed of the house of Israe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6" xml:id="id13" draw:id="id13" draw:layer="layout" svg:width="3.048cm" svg:height="2.54cm" svg:x="38.846cm" svg:y="2.671cm">
          <text:p text:style-name="P4"><text:span text:style-name="T2">Jacob</text:span></text:p>
          <text:p text:style-name="P4"><text:span text:style-name="T3">Gen 25:26</text:span></text:p>
          <text:p text:style-name="P4"><text:span text:style-name="T2">Israel</text:span></text:p>
          <text:p text:style-name="P5"><text:span text:style-name="T4">Gen 32: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10" draw:id="id10" draw:layer="layout" svg:width="3.048cm" svg:height="2.54cm" svg:x="40.823cm" svg:y="6.397cm">
          <text:p text:style-name="P7"><text:span text:style-name="T5">Levi</text:span></text:p>
          <text:p text:style-name="P7"><text:span text:style-name="T6">Exo 6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9" xml:id="id12" draw:id="id12" draw:layer="layout" svg:width="3.048cm" svg:height="2.54cm" svg:x="42.802cm" svg:y="2.672cm">
          <text:p text:style-name="P4"><text:span text:style-name="T2">Leah</text:span></text:p>
          <text:p text:style-name="P4"><text:span text:style-name="T4">Gen 29: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" draw:text-style-name="P1" xml:id="id11" draw:id="id11" draw:layer="layout" draw:type="curve" svg:x1="42.802cm" svg:y1="3.942cm" svg:x2="41.894cm" svg:y2="3.941cm" draw:start-shape="id12" draw:start-glue-point="3" draw:end-shape="id13" draw:end-glue-point="1" svg:d="M42802 3942c-679 0-226-1-908-1" svg:viewBox="0 0 909 2">
          <text:p/>
        </draw:connector>
        <draw:custom-shape draw:style-name="gr5" draw:text-style-name="P8" xml:id="id14" draw:id="id14" draw:layer="layout" svg:width="3.048cm" svg:height="2.54cm" svg:x="25.623cm" svg:y="10.797cm">
          <text:p text:style-name="P7"><text:span text:style-name="T5">Gershon</text:span></text:p>
          <text:p text:style-name="P7"><text:span text:style-name="T6">Exo 6:16</text:span></text:p>
          <text:p text:style-name="P10"><text:span text:style-name="T5">Gershom</text:span></text:p>
          <text:p text:style-name="P10"><text:span text:style-name="T6">1Ch 6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15" draw:id="id15" draw:layer="layout" svg:width="3.048cm" svg:height="2.54cm" svg:x="40.823cm" svg:y="10.797cm">
          <text:p text:style-name="P7"><text:span text:style-name="T5">Kohath</text:span></text:p>
          <text:p text:style-name="P7"><text:span text:style-name="T6">Exo 6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20" draw:id="id20" draw:layer="layout" svg:width="3.048cm" svg:height="2.54cm" svg:x="55.423cm" svg:y="10.797cm">
          <text:p text:style-name="P7"><text:span text:style-name="T5">Merari</text:span></text:p>
          <text:p text:style-name="P7"><text:span text:style-name="T6">Exo 6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27.147cm" svg:y1="10.797cm" svg:x2="42.347cm" svg:y2="8.937cm" draw:start-shape="id14" draw:start-glue-point="0" draw:end-shape="id10" draw:end-glue-point="2" svg:d="M27147 10797c0-1393 15200-464 15200-1860" svg:viewBox="0 0 15201 1861">
          <text:p/>
        </draw:connector>
        <draw:connector draw:style-name="gr1" draw:text-style-name="P1" draw:layer="layout" draw:type="curve" svg:x1="42.347cm" svg:y1="10.797cm" svg:x2="42.347cm" svg:y2="8.937cm" draw:start-shape="id15" draw:start-glue-point="0" draw:end-shape="id10" draw:end-glue-point="2" svg:d="M42347 10797v-1860" svg:viewBox="0 0 1 1861">
          <text:p/>
        </draw:connector>
        <draw:connector draw:style-name="gr1" draw:text-style-name="P1" draw:layer="layout" draw:type="curve" svg:x1="40.674cm" svg:y1="15.152cm" svg:x2="42.347cm" svg:y2="13.337cm" draw:start-shape="id16" draw:start-glue-point="0" draw:end-shape="id15" draw:end-glue-point="2" svg:d="M40674 15152c0-1360 1673-453 1673-1815" svg:viewBox="0 0 1674 1816">
          <text:p/>
        </draw:connector>
        <draw:connector draw:style-name="gr1" draw:text-style-name="P1" draw:layer="layout" draw:type="curve" svg:x1="44.174cm" svg:y1="15.152cm" svg:x2="42.347cm" svg:y2="13.337cm" draw:start-shape="id17" draw:start-glue-point="0" draw:end-shape="id15" draw:end-glue-point="2" svg:d="M44174 15152c0-1360-1827-453-1827-1815" svg:viewBox="0 0 1828 1816">
          <text:p/>
        </draw:connector>
        <draw:connector draw:style-name="gr1" draw:text-style-name="P1" draw:layer="layout" draw:type="curve" svg:x1="47.674cm" svg:y1="15.152cm" svg:x2="42.347cm" svg:y2="13.337cm" draw:start-shape="id18" draw:start-glue-point="0" draw:end-shape="id15" draw:end-glue-point="2" svg:d="M47674 15152c0-1360-5327-453-5327-1815" svg:viewBox="0 0 5328 1816">
          <text:p/>
        </draw:connector>
        <draw:connector draw:style-name="gr1" draw:text-style-name="P1" draw:layer="layout" draw:type="curve" svg:x1="44.174cm" svg:y1="38.452cm" svg:x2="40.674cm" svg:y2="17.692cm" draw:start-shape="id19" draw:start-glue-point="0" draw:end-shape="id16" draw:end-glue-point="2" svg:d="M44174 38452c0-15568-3500-5189-3500-20760" svg:viewBox="0 0 3501 20761">
          <text:p/>
        </draw:connector>
        <draw:connector draw:style-name="gr1" draw:text-style-name="P1" draw:layer="layout" draw:type="curve" svg:x1="56.947cm" svg:y1="10.797cm" svg:x2="42.347cm" svg:y2="8.937cm" draw:start-shape="id20" draw:start-glue-point="0" draw:end-shape="id10" draw:end-glue-point="2" svg:d="M56947 10797c0-1393-14600-464-14600-1860" svg:viewBox="0 0 14601 1861">
          <text:p/>
        </draw:connector>
        <draw:connector draw:style-name="gr1" draw:text-style-name="P1" draw:layer="layout" draw:type="curve" svg:x1="23.747cm" svg:y1="15.147cm" svg:x2="27.147cm" svg:y2="13.337cm" draw:start-shape="id21" draw:start-glue-point="0" draw:end-shape="id14" draw:end-glue-point="2" svg:d="M23747 15147c0-1356 3400-451 3400-1810" svg:viewBox="0 0 3401 1811">
          <text:p/>
        </draw:connector>
        <draw:connector draw:style-name="gr1" draw:text-style-name="P1" draw:layer="layout" draw:type="curve" svg:x1="27.147cm" svg:y1="15.147cm" svg:x2="27.147cm" svg:y2="13.337cm" draw:start-shape="id22" draw:start-glue-point="0" draw:end-shape="id14" draw:end-glue-point="2" svg:d="M27147 15147v-1810" svg:viewBox="0 0 1 1811">
          <text:p/>
        </draw:connector>
        <draw:connector draw:style-name="gr1" draw:text-style-name="P1" draw:layer="layout" draw:type="curve" svg:x1="37.174cm" svg:y1="15.152cm" svg:x2="42.347cm" svg:y2="13.337cm" draw:start-shape="id23" draw:start-glue-point="0" draw:end-shape="id15" draw:end-glue-point="2" svg:d="M37174 15152c0-1360 5173-453 5173-1815" svg:viewBox="0 0 5174 1816">
          <text:p/>
        </draw:connector>
        <draw:connector draw:style-name="gr1" draw:text-style-name="P1" draw:layer="layout" draw:type="curve" svg:x1="56.944cm" svg:y1="15.127cm" svg:x2="56.947cm" svg:y2="13.337cm" draw:start-shape="id24" draw:start-glue-point="0" draw:end-shape="id20" draw:end-glue-point="2" svg:d="M56944 15127c0-1341 3-446 3-1790" svg:viewBox="0 0 4 1791">
          <text:p/>
        </draw:connector>
        <draw:connector draw:style-name="gr1" draw:text-style-name="P1" draw:layer="layout" draw:type="curve" svg:x1="60.474cm" svg:y1="15.152cm" svg:x2="56.947cm" svg:y2="13.337cm" draw:start-shape="id25" draw:start-glue-point="0" draw:end-shape="id20" draw:end-glue-point="2" svg:d="M60474 15152c0-1360-3527-453-3527-1815" svg:viewBox="0 0 3528 1816">
          <text:p/>
        </draw:connector>
        <draw:connector draw:style-name="gr1" draw:text-style-name="P1" draw:layer="layout" draw:type="curve" svg:x1="37.174cm" svg:y1="38.452cm" svg:x2="40.674cm" svg:y2="17.692cm" draw:start-shape="id26" draw:start-glue-point="0" draw:end-shape="id16" draw:end-glue-point="2" svg:d="M37174 38452c0-15568 3500-5189 3500-20760" svg:viewBox="0 0 3501 20761">
          <text:p/>
        </draw:connector>
        <draw:connector draw:style-name="gr1" draw:text-style-name="P1" draw:layer="layout" draw:type="curve" svg:x1="40.674cm" svg:y1="38.452cm" svg:x2="40.674cm" svg:y2="17.692cm" draw:start-shape="id27" draw:start-glue-point="0" draw:end-shape="id16" draw:end-glue-point="2" svg:d="M40674 38452v-20760" svg:viewBox="0 0 1 20761">
          <text:p/>
        </draw:connector>
        <draw:custom-shape draw:style-name="gr5" draw:text-style-name="P8" xml:id="id21" draw:id="id21" draw:layer="layout" svg:width="3.048cm" svg:height="2.54cm" svg:x="22.223cm" svg:y="15.147cm">
          <text:p text:style-name="P7"><text:span text:style-name="T5">Libni</text:span></text:p>
          <text:p text:style-name="P7"><text:span text:style-name="T6">Exo 6:17</text:span></text:p>
          <text:p text:style-name="P10"><text:span text:style-name="T5">Libnites</text:span></text:p>
          <text:p text:style-name="P7"><text:span text:style-name="T6">Num 26:5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22" draw:id="id22" draw:layer="layout" svg:width="3.048cm" svg:height="2.54cm" svg:x="25.623cm" svg:y="15.147cm">
          <text:p text:style-name="P7"><text:span text:style-name="T5">Shimi</text:span></text:p>
          <text:p text:style-name="P7"><text:span text:style-name="T6">Exo 6:17</text:span></text:p>
          <text:p text:style-name="P10"><text:span text:style-name="T5">Shimei</text:span></text:p>
          <text:p text:style-name="P10"><text:span text:style-name="T6">1Ch 6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23" draw:id="id23" draw:layer="layout" svg:width="3.048cm" svg:height="2.54cm" svg:x="35.65cm" svg:y="15.152cm">
          <text:p text:style-name="P7"><text:span text:style-name="T5">Amram</text:span></text:p>
          <text:p text:style-name="P7"><text:span text:style-name="T6">Exo 6:18</text:span></text:p>
          <text:p text:style-name="P7"><text:span text:style-name="T6">1Ch 6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16" draw:id="id16" draw:layer="layout" svg:width="3.048cm" svg:height="2.54cm" svg:x="39.15cm" svg:y="15.152cm">
          <text:p text:style-name="P7"><text:span text:style-name="T5">Izhar</text:span></text:p>
          <text:p text:style-name="P7"><text:span text:style-name="T6">Exo 6:18</text:span></text:p>
          <text:p text:style-name="P10"><text:span text:style-name="T5">Amminadab</text:span></text:p>
          <text:p text:style-name="P10"><text:span text:style-name="T6">1Ch 6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17" draw:id="id17" draw:layer="layout" svg:width="3.048cm" svg:height="2.54cm" svg:x="42.65cm" svg:y="15.152cm">
          <text:p text:style-name="P7"><text:span text:style-name="T5">Hebron</text:span></text:p>
          <text:p text:style-name="P7"><text:span text:style-name="T6">Exo 6:18</text:span></text:p>
          <text:p text:style-name="P10"><text:span text:style-name="T5">Hebronites</text:span></text:p>
          <text:p text:style-name="P7"><text:span text:style-name="T6">Num 26:5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18" draw:id="id18" draw:layer="layout" svg:width="3.048cm" svg:height="2.54cm" svg:x="46.15cm" svg:y="15.152cm">
          <text:p text:style-name="P7"><text:span text:style-name="T5">Uzziel</text:span></text:p>
          <text:p text:style-name="P7"><text:span text:style-name="T6">Exo 6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8" xml:id="id24" draw:id="id24" draw:layer="layout" svg:width="3.048cm" svg:height="3.04cm" svg:x="55.42cm" svg:y="15.127cm">
          <text:p text:style-name="P7"><text:span text:style-name="T5">Mahali</text:span></text:p>
          <text:p text:style-name="P7"><text:span text:style-name="T6">Exo 6:19</text:span></text:p>
          <text:p text:style-name="P10"><text:span text:style-name="T5">Mahli</text:span></text:p>
          <text:p text:style-name="P10"><text:span text:style-name="T6">1Ch 6:19</text:span></text:p>
          <text:p text:style-name="P10"><text:span text:style-name="T5">Mahlites</text:span></text:p>
          <text:p text:style-name="P7"><text:span text:style-name="T6">Num 26:5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25" draw:id="id25" draw:layer="layout" svg:width="3.048cm" svg:height="2.54cm" svg:x="58.95cm" svg:y="15.152cm">
          <text:p text:style-name="P7"><text:span text:style-name="T5">Mushi</text:span></text:p>
          <text:p text:style-name="P7"><text:span text:style-name="T6">Exo 6:19</text:span></text:p>
          <text:p text:style-name="P10"><text:span text:style-name="T5">Mushites</text:span></text:p>
          <text:p text:style-name="P10"><text:span text:style-name="T6">Num 26:5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47.674cm" svg:y1="38.452cm" svg:x2="47.674cm" svg:y2="17.692cm" draw:start-shape="id28" draw:start-glue-point="0" draw:end-shape="id18" draw:end-glue-point="2" svg:d="M47674 38452v-20760" svg:viewBox="0 0 1 20761">
          <text:p/>
        </draw:connector>
        <draw:connector draw:style-name="gr1" draw:text-style-name="P1" draw:layer="layout" draw:type="curve" svg:x1="54.674cm" svg:y1="38.452cm" svg:x2="47.674cm" svg:y2="17.692cm" draw:start-shape="id29" draw:start-glue-point="0" draw:end-shape="id18" draw:end-glue-point="2" svg:d="M54674 38452c0-15568-7000-5189-7000-20760" svg:viewBox="0 0 7001 20761">
          <text:p/>
        </draw:connector>
        <draw:connector draw:style-name="gr1" draw:text-style-name="P1" draw:layer="layout" draw:type="curve" svg:x1="29.274cm" svg:y1="43.452cm" svg:x2="23.828cm" svg:y2="39.724cm" draw:start-shape="id30" draw:start-glue-point="0" draw:end-shape="id31" draw:end-glue-point="0" svg:d="M29274 43452c0-2755-5446-892-5446-3728" svg:viewBox="0 0 5447 3729">
          <text:p/>
        </draw:connector>
        <draw:connector draw:style-name="gr1" draw:text-style-name="P1" draw:layer="layout" draw:type="curve" svg:x1="51.174cm" svg:y1="38.452cm" svg:x2="47.674cm" svg:y2="17.692cm" draw:start-shape="id32" draw:start-glue-point="0" draw:end-shape="id18" draw:end-glue-point="2" svg:d="M51174 38452c0-15568-3500-5189-3500-20760" svg:viewBox="0 0 3501 20761">
          <text:p/>
        </draw:connector>
        <draw:connector draw:style-name="gr1" draw:text-style-name="P1" draw:layer="layout" draw:type="curve" svg:x1="23.648cm" svg:y1="82.052cm" svg:x2="23.648cm" svg:y2="81.292cm" draw:start-shape="id33" draw:start-glue-point="0" draw:end-shape="id34" draw:end-glue-point="2" svg:d="M23648 82052v-760" svg:viewBox="0 0 1 761">
          <text:p/>
        </draw:connector>
        <draw:connector draw:style-name="gr1" draw:text-style-name="P1" draw:layer="layout" draw:type="curve" svg:x1="25.774cm" svg:y1="43.452cm" svg:x2="23.828cm" svg:y2="39.724cm" draw:start-shape="id35" draw:start-glue-point="0" draw:end-shape="id31" draw:end-glue-point="0" svg:d="M25774 43452c0-2755-1946-892-1946-3728" svg:viewBox="0 0 1947 3729">
          <text:p/>
        </draw:connector>
        <draw:connector draw:style-name="gr1" draw:text-style-name="P1" draw:layer="layout" draw:type="curve" svg:x1="17.974cm" svg:y1="43.452cm" svg:x2="23.828cm" svg:y2="39.724cm" draw:start-shape="id36" draw:start-glue-point="0" draw:end-shape="id31" draw:end-glue-point="0" svg:d="M17974 43452c0-2755 5854-892 5854-3728" svg:viewBox="0 0 5855 3729">
          <text:p/>
        </draw:connector>
        <draw:connector draw:style-name="gr1" draw:text-style-name="P1" draw:layer="layout" draw:type="curve" svg:x1="14.474cm" svg:y1="43.452cm" svg:x2="23.828cm" svg:y2="39.724cm" draw:start-shape="id37" draw:start-glue-point="0" draw:end-shape="id31" draw:end-glue-point="0" svg:d="M14474 43452c0-2755 9354-892 9354-3728" svg:viewBox="0 0 9355 3729">
          <text:p/>
        </draw:connector>
        <draw:connector draw:style-name="gr1" draw:text-style-name="P1" draw:layer="layout" draw:type="curve" svg:x1="23.648cm" svg:y1="85.352cm" svg:x2="23.648cm" svg:y2="84.592cm" draw:start-shape="id38" draw:start-glue-point="0" draw:end-shape="id33" draw:end-glue-point="2" svg:d="M23648 85352v-760" svg:viewBox="0 0 1 761">
          <text:p/>
        </draw:connector>
        <draw:connector draw:style-name="gr1" draw:text-style-name="P1" draw:layer="layout" draw:type="curve" svg:x1="23.648cm" svg:y1="88.752cm" svg:x2="23.648cm" svg:y2="87.892cm" draw:start-shape="id39" draw:start-glue-point="0" draw:end-shape="id38" draw:end-glue-point="2" svg:d="M23648 88752v-860" svg:viewBox="0 0 1 861">
          <text:p/>
        </draw:connector>
        <draw:connector draw:style-name="gr1" draw:text-style-name="P1" draw:layer="layout" draw:type="curve" svg:x1="23.648cm" svg:y1="50.652cm" svg:x2="23.648cm" svg:y2="49.992cm" draw:start-shape="id40" draw:start-glue-point="0" draw:end-shape="id5" draw:end-glue-point="2" svg:d="M23648 50652v-660" svg:viewBox="0 0 1 661">
          <text:p/>
        </draw:connector>
        <draw:connector draw:style-name="gr1" draw:text-style-name="P1" draw:layer="layout" draw:type="curve" svg:x1="23.648cm" svg:y1="53.752cm" svg:x2="23.648cm" svg:y2="53.192cm" draw:start-shape="id41" draw:start-glue-point="0" draw:end-shape="id40" draw:end-glue-point="2" svg:d="M23648 53752v-560" svg:viewBox="0 0 1 561">
          <text:p/>
        </draw:connector>
        <draw:connector draw:style-name="gr1" draw:text-style-name="P1" draw:layer="layout" draw:type="curve" svg:x1="23.648cm" svg:y1="56.752cm" svg:x2="23.648cm" svg:y2="56.292cm" draw:start-shape="id42" draw:start-glue-point="0" draw:end-shape="id41" draw:end-glue-point="2" svg:d="M23648 56752v-460" svg:viewBox="0 0 1 461">
          <text:p/>
        </draw:connector>
        <draw:connector draw:style-name="gr1" draw:text-style-name="P1" draw:layer="layout" draw:type="curve" svg:x1="23.648cm" svg:y1="92.052cm" svg:x2="23.648cm" svg:y2="91.292cm" draw:start-shape="id43" draw:start-glue-point="0" draw:end-shape="id39" draw:end-glue-point="2" svg:d="M23648 92052v-760" svg:viewBox="0 0 1 761">
          <text:p/>
        </draw:connector>
        <draw:connector draw:style-name="gr1" draw:text-style-name="P1" draw:layer="layout" draw:type="curve" svg:x1="23.648cm" svg:y1="95.352cm" svg:x2="23.648cm" svg:y2="94.592cm" draw:start-shape="id44" draw:start-glue-point="0" draw:end-shape="id43" draw:end-glue-point="2" svg:d="M23648 95352v-760" svg:viewBox="0 0 1 761">
          <text:p/>
        </draw:connector>
        <draw:custom-shape draw:style-name="gr9" draw:text-style-name="P9" xml:id="id45" draw:id="id45" draw:layer="layout" svg:width="3.048cm" svg:height="2.54cm" svg:x="35.602cm" svg:y="10.794cm">
          <text:p text:style-name="P4"><text:span text:style-name="T2">Jochebed</text:span></text:p>
          <text:p text:style-name="P4"><text:span text:style-name="T4">Exo 6:20</text:span></text:p>
          <text:p text:style-name="P4"><text:span text:style-name="T4">Num 26:5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" draw:text-style-name="P1" xml:id="id7" draw:id="id7" draw:layer="layout" draw:type="curve" svg:x1="35.602cm" svg:y1="12.064cm" svg:x2="35.65cm" svg:y2="16.422cm" draw:start-shape="id45" draw:start-glue-point="3" draw:end-shape="id23" draw:end-glue-point="3" svg:d="M35602 12064c-763 0-787 4358 48 4358" svg:viewBox="0 0 624 4359">
          <text:p/>
        </draw:connector>
        <draw:connector draw:style-name="gr10" draw:text-style-name="P1" draw:layer="layout" draw:type="curve" svg:x1="42.347cm" svg:y1="8.937cm" svg:x2="37.126cm" svg:y2="10.794cm" draw:start-shape="id10" draw:start-glue-point="2" draw:end-shape="id45" draw:end-glue-point="0" svg:d="M42347 8937c0 1387-5221 459-5221 1857" svg:viewBox="0 0 5222 1858">
          <text:p/>
        </draw:connector>
        <draw:custom-shape draw:style-name="gr11" draw:text-style-name="P8" xml:id="id9" draw:id="id9" draw:layer="layout" svg:width="3.048cm" svg:height="2.54cm" svg:x="25.05cm" svg:y="38.452cm">
          <text:p text:style-name="P7"><text:span text:style-name="T5">Aaron</text:span></text:p>
          <text:p text:style-name="P7"><text:span text:style-name="T6">Exo 6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8" xml:id="id6" draw:id="id6" draw:layer="layout" svg:width="3.048cm" svg:height="2.54cm" svg:x="28.55cm" svg:y="38.452cm">
          <text:p text:style-name="P7"><text:span text:style-name="T5">Moses</text:span></text:p>
          <text:p text:style-name="P7"><text:span text:style-name="T6">Exo 6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8" draw:id="id8" draw:layer="layout" svg:width="3.048cm" svg:height="2.54cm" svg:x="32.081cm" svg:y="38.467cm">
          <text:p text:style-name="P4"><text:span text:style-name="T2">Miriam</text:span></text:p>
          <text:p text:style-name="P4"><text:span text:style-name="T4">Num 26:5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26" draw:id="id26" draw:layer="layout" svg:width="3.048cm" svg:height="2.54cm" svg:x="35.65cm" svg:y="38.452cm">
          <text:p text:style-name="P7"><text:span text:style-name="T5">Korah</text:span></text:p>
          <text:p text:style-name="P7"><text:span text:style-name="T6">Exo 6:21</text:span></text:p>
          <text:p text:style-name="P7"><text:span text:style-name="T6">1Ch 6:22</text:span></text:p>
          <text:p text:style-name="P10"><text:span text:style-name="T5">Korathites?</text:span></text:p>
          <text:p text:style-name="P10"><text:span text:style-name="T7">Num 26:5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27" draw:id="id27" draw:layer="layout" svg:width="3.048cm" svg:height="2.54cm" svg:x="39.15cm" svg:y="38.452cm">
          <text:p text:style-name="P7"><text:span text:style-name="T5">Nepheg</text:span></text:p>
          <text:p text:style-name="P7"><text:span text:style-name="T6">Exo 6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19" draw:id="id19" draw:layer="layout" svg:width="3.048cm" svg:height="2.54cm" svg:x="42.65cm" svg:y="38.452cm">
          <text:p text:style-name="P7"><text:span text:style-name="T5">Zichri</text:span></text:p>
          <text:p text:style-name="P7"><text:span text:style-name="T6">Exo 6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28" draw:id="id28" draw:layer="layout" svg:width="3.048cm" svg:height="2.54cm" svg:x="46.15cm" svg:y="38.452cm">
          <text:p text:style-name="P7"><text:span text:style-name="T5">Mishael</text:span></text:p>
          <text:p text:style-name="P7"><text:span text:style-name="T6">Exo 6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32" draw:id="id32" draw:layer="layout" svg:width="3.048cm" svg:height="2.54cm" svg:x="49.65cm" svg:y="38.452cm">
          <text:p text:style-name="P7"><text:span text:style-name="T5">Elzaphan</text:span></text:p>
          <text:p text:style-name="P7"><text:span text:style-name="T6">Exo 6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29" draw:id="id29" draw:layer="layout" svg:width="3.048cm" svg:height="2.54cm" svg:x="53.15cm" svg:y="38.452cm">
          <text:p text:style-name="P7"><text:span text:style-name="T5">Zithri</text:span></text:p>
          <text:p text:style-name="P7"><text:span text:style-name="T6">Exo 6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58" draw:id="id58" draw:layer="layout" svg:width="3.048cm" svg:height="2.54cm" svg:x="32.15cm" svg:y="43.452cm">
          <text:p text:style-name="P7"><text:span text:style-name="T5">Assir</text:span></text:p>
          <text:p text:style-name="P7"><text:span text:style-name="T6">Exo 6:24</text:span></text:p>
          <text:p text:style-name="P7"><text:span text:style-name="T6">1Ch 6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62" draw:id="id62" draw:layer="layout" svg:width="3.048cm" svg:height="2.54cm" svg:x="35.65cm" svg:y="43.452cm">
          <text:p text:style-name="P7"><text:span text:style-name="T5">Elkanah</text:span></text:p>
          <text:p text:style-name="P7"><text:span text:style-name="T6">Exo 6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61" draw:id="id61" draw:layer="layout" svg:width="3.048cm" svg:height="2.54cm" svg:x="39.15cm" svg:y="43.452cm">
          <text:p text:style-name="P7"><text:span text:style-name="T5">Abiasaph</text:span></text:p>
          <text:p text:style-name="P7"><text:span text:style-name="T6">Exo 6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23.648cm" svg:y1="59.752cm" svg:x2="23.648cm" svg:y2="59.292cm" draw:start-shape="id46" draw:start-glue-point="0" draw:end-shape="id42" draw:end-glue-point="2" svg:d="M23648 59752v-460" svg:viewBox="0 0 1 461">
          <text:p/>
        </draw:connector>
        <draw:connector draw:style-name="gr1" draw:text-style-name="P1" draw:layer="layout" draw:type="curve" svg:x1="23.648cm" svg:y1="98.652cm" svg:x2="23.648cm" svg:y2="97.892cm" draw:start-shape="id47" draw:start-glue-point="0" draw:end-shape="id44" draw:end-glue-point="2" svg:d="M23648 98652v-760" svg:viewBox="0 0 1 761">
          <text:p/>
        </draw:connector>
        <draw:connector draw:style-name="gr1" draw:text-style-name="P1" draw:layer="layout" draw:type="curve" svg:x1="23.648cm" svg:y1="62.852cm" svg:x2="23.648cm" svg:y2="62.292cm" draw:start-shape="id48" draw:start-glue-point="0" draw:end-shape="id46" draw:end-glue-point="2" svg:d="M23648 62852v-560" svg:viewBox="0 0 1 561">
          <text:p/>
        </draw:connector>
        <draw:connector draw:style-name="gr1" draw:text-style-name="P1" draw:layer="layout" draw:type="curve" svg:x1="23.648cm" svg:y1="65.952cm" svg:x2="23.648cm" svg:y2="65.392cm" draw:start-shape="id49" draw:start-glue-point="0" draw:end-shape="id48" draw:end-glue-point="2" svg:d="M23648 65952v-560" svg:viewBox="0 0 1 561">
          <text:p/>
        </draw:connector>
        <draw:connector draw:style-name="gr1" draw:text-style-name="P1" draw:layer="layout" draw:type="curve" svg:x1="23.648cm" svg:y1="69.052cm" svg:x2="23.648cm" svg:y2="68.492cm" draw:start-shape="id50" draw:start-glue-point="0" draw:end-shape="id49" draw:end-glue-point="2" svg:d="M23648 69052v-560" svg:viewBox="0 0 1 561">
          <text:p/>
        </draw:connector>
        <draw:connector draw:style-name="gr1" draw:text-style-name="P1" draw:layer="layout" draw:type="curve" svg:x1="23.648cm" svg:y1="101.852cm" svg:x2="23.648cm" svg:y2="101.192cm" draw:start-shape="id51" draw:start-glue-point="0" draw:end-shape="id47" draw:end-glue-point="2" svg:d="M23648 101852v-660" svg:viewBox="0 0 1 661">
          <text:p/>
        </draw:connector>
        <draw:connector draw:style-name="gr1" draw:text-style-name="P1" draw:layer="layout" draw:type="curve" svg:x1="23.648cm" svg:y1="105.052cm" svg:x2="23.648cm" svg:y2="104.392cm" draw:start-shape="id52" draw:start-glue-point="0" draw:end-shape="id51" draw:end-glue-point="2" svg:d="M23648 105052v-660" svg:viewBox="0 0 1 661">
          <text:p/>
        </draw:connector>
        <draw:connector draw:style-name="gr1" draw:text-style-name="P1" draw:layer="layout" draw:type="curve" svg:x1="23.648cm" svg:y1="72.252cm" svg:x2="23.648cm" svg:y2="71.592cm" draw:start-shape="id53" draw:start-glue-point="0" draw:end-shape="id50" draw:end-glue-point="2" svg:d="M23648 72252v-660" svg:viewBox="0 0 1 661">
          <text:p/>
        </draw:connector>
        <draw:connector draw:style-name="gr1" draw:text-style-name="P1" draw:layer="layout" draw:type="curve" svg:x1="23.648cm" svg:y1="75.452cm" svg:x2="23.648cm" svg:y2="74.792cm" draw:start-shape="id54" draw:start-glue-point="0" draw:end-shape="id53" draw:end-glue-point="2" svg:d="M23648 75452v-660" svg:viewBox="0 0 1 661">
          <text:p/>
        </draw:connector>
        <draw:connector draw:style-name="gr1" draw:text-style-name="P1" draw:layer="layout" draw:type="curve" svg:x1="23.648cm" svg:y1="78.752cm" svg:x2="23.648cm" svg:y2="77.992cm" draw:start-shape="id34" draw:start-glue-point="0" draw:end-shape="id54" draw:end-glue-point="2" svg:d="M23648 78752v-760" svg:viewBox="0 0 1 761">
          <text:p/>
        </draw:connector>
        <draw:connector draw:style-name="gr1" draw:text-style-name="P1" draw:layer="layout" draw:type="curve" svg:x1="23.648cm" svg:y1="108.252cm" svg:x2="23.648cm" svg:y2="107.592cm" draw:start-shape="id55" draw:start-glue-point="0" draw:end-shape="id52" draw:end-glue-point="2" svg:d="M23648 108252v-660" svg:viewBox="0 0 1 661">
          <text:p/>
        </draw:connector>
        <draw:connector draw:style-name="gr1" draw:text-style-name="P1" draw:layer="layout" draw:type="curve" svg:x1="23.648cm" svg:y1="111.952cm" svg:x2="23.648cm" svg:y2="110.792cm" draw:start-shape="id56" draw:start-glue-point="0" draw:end-shape="id55" draw:end-glue-point="2" svg:d="M23648 111952v-1160" svg:viewBox="0 0 1 1161">
          <text:p/>
        </draw:connector>
        <draw:connector draw:style-name="gr1" draw:text-style-name="P1" draw:layer="layout" draw:type="curve" svg:x1="33.67cm" svg:y1="47.457cm" svg:x2="33.674cm" svg:y2="45.992cm" draw:start-shape="id57" draw:start-glue-point="0" draw:end-shape="id58" draw:end-glue-point="2" svg:d="M33670 47457c0-1098 4-366 4-1465" svg:viewBox="0 0 5 1466">
          <text:p/>
        </draw:connector>
        <draw:connector draw:style-name="gr2" draw:text-style-name="P1" draw:layer="layout" draw:type="curve" svg:x1="21.105cm" svg:y1="38.456cm" svg:x2="19.329cm" svg:y2="17.682cm" draw:start-shape="id59" draw:start-glue-point="0" draw:end-shape="id60" draw:end-glue-point="2" svg:d="M21105 38456c0-15579-1776-5192-1776-20774" svg:viewBox="0 0 1777 20775">
          <text:p/>
        </draw:connector>
        <draw:connector draw:style-name="gr1" draw:text-style-name="P1" draw:layer="layout" draw:type="curve" svg:x1="66.189cm" svg:y1="26.242cm" svg:x2="66.517cm" svg:y2="23.786cm" svg:d="M66189 26242c0-1801 328-574 328-2456" svg:viewBox="0 0 329 2457">
          <text:p/>
        </draw:connector>
        <draw:connector draw:style-name="gr1" draw:text-style-name="P1" draw:layer="layout" draw:type="curve" svg:x1="67.189cm" svg:y1="26.242cm" svg:x2="67.517cm" svg:y2="23.786cm" svg:d="M67189 26242c0-1801 328-574 328-2456" svg:viewBox="0 0 329 2457">
          <text:p/>
        </draw:connector>
        <draw:connector draw:style-name="gr1" draw:text-style-name="P1" draw:layer="layout" draw:type="curve" svg:x1="68.189cm" svg:y1="26.242cm" svg:x2="68.517cm" svg:y2="23.786cm" svg:d="M68189 26242c0-1801 328-574 328-2456" svg:viewBox="0 0 329 2457">
          <text:p/>
        </draw:connector>
        <draw:connector draw:style-name="gr1" draw:text-style-name="P1" draw:layer="layout" draw:type="curve" svg:x1="67.189cm" svg:y1="29.242cm" svg:x2="67.517cm" svg:y2="26.786cm" svg:d="M67189 29242c0-1801 328-574 328-2456" svg:viewBox="0 0 329 2457">
          <text:p/>
        </draw:connector>
        <draw:connector draw:style-name="gr1" draw:text-style-name="P1" draw:layer="layout" draw:type="curve" svg:x1="68.189cm" svg:y1="29.242cm" svg:x2="68.517cm" svg:y2="26.786cm" svg:d="M68189 29242c0-1801 328-574 328-2456" svg:viewBox="0 0 329 2457">
          <text:p/>
        </draw:connector>
        <draw:connector draw:style-name="gr1" draw:text-style-name="P1" draw:layer="layout" draw:type="curve" svg:x1="69.189cm" svg:y1="26.242cm" svg:x2="69.517cm" svg:y2="23.786cm" svg:d="M69189 26242c0-1801 328-574 328-2456" svg:viewBox="0 0 329 2457">
          <text:p/>
        </draw:connector>
        <draw:connector draw:style-name="gr1" draw:text-style-name="P1" draw:layer="layout" draw:type="curve" svg:x1="70.189cm" svg:y1="26.242cm" svg:x2="70.517cm" svg:y2="23.786cm" svg:d="M70189 26242c0-1801 328-574 328-2456" svg:viewBox="0 0 329 2457">
          <text:p/>
        </draw:connector>
        <draw:connector draw:style-name="gr1" draw:text-style-name="P1" draw:layer="layout" draw:type="curve" svg:x1="71.189cm" svg:y1="26.242cm" svg:x2="71.517cm" svg:y2="23.786cm" svg:d="M71189 26242c0-1801 328-574 328-2456" svg:viewBox="0 0 329 2457">
          <text:p/>
        </draw:connector>
        <draw:connector draw:style-name="gr1" draw:text-style-name="P1" draw:layer="layout" draw:type="curve" svg:x1="70.189cm" svg:y1="29.242cm" svg:x2="70.517cm" svg:y2="26.786cm" svg:d="M70189 29242c0-1801 328-574 328-2456" svg:viewBox="0 0 329 2457">
          <text:p/>
        </draw:connector>
        <draw:connector draw:style-name="gr1" draw:text-style-name="P1" draw:layer="layout" draw:type="curve" svg:x1="71.189cm" svg:y1="29.242cm" svg:x2="71.517cm" svg:y2="26.786cm" svg:d="M71189 29242c0-1801 328-574 328-2456" svg:viewBox="0 0 329 2457">
          <text:p/>
        </draw:connector>
        <draw:connector draw:style-name="gr1" draw:text-style-name="P1" draw:layer="layout" draw:type="curve" svg:x1="72.189cm" svg:y1="26.242cm" svg:x2="72.517cm" svg:y2="23.786cm" svg:d="M72189 26242c0-1801 328-574 328-2456" svg:viewBox="0 0 329 2457">
          <text:p/>
        </draw:connector>
        <draw:connector draw:style-name="gr1" draw:text-style-name="P1" draw:layer="layout" draw:type="curve" svg:x1="72.189cm" svg:y1="29.242cm" svg:x2="72.517cm" svg:y2="26.786cm" svg:d="M72189 29242c0-1801 328-574 328-2456" svg:viewBox="0 0 329 2457">
          <text:p/>
        </draw:connector>
        <draw:connector draw:style-name="gr1" draw:text-style-name="P1" draw:layer="layout" draw:type="curve" svg:x1="73.189cm" svg:y1="26.242cm" svg:x2="73.517cm" svg:y2="23.786cm" svg:d="M73189 26242c0-1801 328-574 328-2456" svg:viewBox="0 0 329 2457">
          <text:p/>
        </draw:connector>
        <draw:connector draw:style-name="gr1" draw:text-style-name="P1" draw:layer="layout" draw:type="curve" svg:x1="74.189cm" svg:y1="26.242cm" svg:x2="74.517cm" svg:y2="23.786cm" svg:d="M74189 26242c0-1801 328-574 328-2456" svg:viewBox="0 0 329 2457">
          <text:p/>
        </draw:connector>
        <draw:connector draw:style-name="gr1" draw:text-style-name="P1" draw:layer="layout" draw:type="curve" svg:x1="75.189cm" svg:y1="26.242cm" svg:x2="75.517cm" svg:y2="23.786cm" svg:d="M75189 26242c0-1801 328-574 328-2456" svg:viewBox="0 0 329 2457">
          <text:p/>
        </draw:connector>
        <draw:connector draw:style-name="gr1" draw:text-style-name="P1" draw:layer="layout" draw:type="curve" svg:x1="74.189cm" svg:y1="29.242cm" svg:x2="74.517cm" svg:y2="26.786cm" svg:d="M74189 29242c0-1801 328-574 328-2456" svg:viewBox="0 0 329 2457">
          <text:p/>
        </draw:connector>
        <draw:connector draw:style-name="gr1" draw:text-style-name="P1" draw:layer="layout" draw:type="curve" svg:x1="75.189cm" svg:y1="29.242cm" svg:x2="75.517cm" svg:y2="26.786cm" svg:d="M75189 29242c0-1801 328-574 328-2456" svg:viewBox="0 0 329 2457">
          <text:p/>
        </draw:connector>
        <draw:connector draw:style-name="gr1" draw:text-style-name="P1" draw:layer="layout" draw:type="curve" svg:x1="76.189cm" svg:y1="26.242cm" svg:x2="76.517cm" svg:y2="23.786cm" svg:d="M76189 26242c0-1801 328-574 328-2456" svg:viewBox="0 0 329 2457">
          <text:p/>
        </draw:connector>
        <draw:connector draw:style-name="gr1" draw:text-style-name="P1" draw:layer="layout" draw:type="curve" svg:x1="77.189cm" svg:y1="26.242cm" svg:x2="77.517cm" svg:y2="23.786cm" svg:d="M77189 26242c0-1801 328-574 328-2456" svg:viewBox="0 0 329 2457">
          <text:p/>
        </draw:connector>
        <draw:connector draw:style-name="gr1" draw:text-style-name="P1" draw:layer="layout" draw:type="curve" svg:x1="40.674cm" svg:y1="43.452cm" svg:x2="37.174cm" svg:y2="40.992cm" draw:start-shape="id61" draw:start-glue-point="0" draw:end-shape="id26" draw:end-glue-point="2" svg:d="M40674 43452c0-1843-3500-614-3500-2460" svg:viewBox="0 0 3501 2461">
          <text:p/>
        </draw:connector>
        <draw:connector draw:style-name="gr1" draw:text-style-name="P1" draw:layer="layout" draw:type="curve" svg:x1="37.174cm" svg:y1="43.452cm" svg:x2="37.174cm" svg:y2="40.992cm" draw:start-shape="id62" draw:start-glue-point="0" draw:end-shape="id26" draw:end-glue-point="2" svg:d="M37174 43452v-2460" svg:viewBox="0 0 1 2461">
          <text:p/>
        </draw:connector>
        <draw:connector draw:style-name="gr1" draw:text-style-name="P1" draw:layer="layout" draw:type="curve" svg:x1="33.674cm" svg:y1="43.452cm" svg:x2="37.174cm" svg:y2="40.992cm" draw:start-shape="id58" draw:start-glue-point="0" draw:end-shape="id26" draw:end-glue-point="2" svg:d="M33674 43452c0-1843 3500-614 3500-2460" svg:viewBox="0 0 3501 2461">
          <text:p/>
        </draw:connector>
        <draw:custom-shape draw:style-name="gr14" draw:text-style-name="P12" draw:layer="layout" svg:width="14.246cm" svg:height="3.167cm" svg:x="31.839cm" svg:y="43.212cm">
          <text:p text:style-name="P11"><text:span text:style-name="T1">The families</text:span></text:p>
          <text:p text:style-name="P11"><text:span text:style-name="T1">of the</text:span></text:p>
          <text:p text:style-name="P11"><text:span text:style-name="T8">Korhites</text:span></text:p>
          <text:p text:style-name="P11"><text:span text:style-name="T9">Exo 6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xml:id="id59" draw:id="id59" draw:layer="layout" svg:width="3.048cm" svg:height="2.54cm" svg:x="19.581cm" svg:y="38.456cm">
          <text:p text:style-name="P4"><text:span text:style-name="T2">Elisheba</text:span></text:p>
          <text:p text:style-name="P4"><text:span text:style-name="T4">Exo 6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3" xml:id="id60" draw:id="id60" draw:layer="layout" svg:width="3.048cm" svg:height="2.54cm" svg:x="17.805cm" svg:y="15.142cm">
          <text:p text:style-name="P7"><text:span text:style-name="T5">Amminadab</text:span></text:p>
          <text:p text:style-name="P7"><text:span text:style-name="T6">Exo 6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3" xml:id="id63" draw:id="id63" draw:layer="layout" svg:width="3.048cm" svg:height="2.54cm" svg:x="15.997cm" svg:y="38.464cm">
          <text:p text:style-name="P7"><text:span text:style-name="T5">Naashon</text:span></text:p>
          <text:p text:style-name="P7"><text:span text:style-name="T6">Exo 6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1" draw:layer="layout" draw:type="curve" svg:x1="19.329cm" svg:y1="17.682cm" svg:x2="17.521cm" svg:y2="38.464cm" draw:start-shape="id60" draw:start-glue-point="2" draw:end-shape="id63" draw:end-glue-point="0" svg:d="M19329 17682c0 15588-1808 5197-1808 20782" svg:viewBox="0 0 1809 20783">
          <text:p/>
        </draw:connector>
        <draw:connector draw:style-name="gr7" draw:text-style-name="P1" xml:id="id31" draw:id="id31" draw:layer="layout" draw:type="curve" svg:x1="22.629cm" svg:y1="39.726cm" svg:x2="25.05cm" svg:y2="39.722cm" draw:start-shape="id59" draw:start-glue-point="1" draw:end-shape="id9" draw:end-glue-point="3" svg:d="M22629 39726c1804 0 594-4 2421-4" svg:viewBox="0 0 2422 5">
          <text:p/>
        </draw:connector>
        <draw:custom-shape draw:style-name="gr5" draw:text-style-name="P8" xml:id="id37" draw:id="id37" draw:layer="layout" svg:width="3.048cm" svg:height="2.54cm" svg:x="12.95cm" svg:y="43.452cm">
          <text:p text:style-name="P7"><text:span text:style-name="T5">Nadab</text:span></text:p>
          <text:p text:style-name="P7"><text:span text:style-name="T6">Exo 6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36" draw:id="id36" draw:layer="layout" svg:width="3.048cm" svg:height="2.54cm" svg:x="16.45cm" svg:y="43.452cm">
          <text:p text:style-name="P7"><text:span text:style-name="T5">Abihu</text:span></text:p>
          <text:p text:style-name="P7"><text:span text:style-name="T6">Exo 6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35" draw:id="id35" draw:layer="layout" svg:width="3.048cm" svg:height="2.54cm" svg:x="24.25cm" svg:y="43.452cm">
          <text:p text:style-name="P7"><text:span text:style-name="T5">Eleazar</text:span></text:p>
          <text:p text:style-name="P7"><text:span text:style-name="T6">Exo 6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30" draw:id="id30" draw:layer="layout" svg:width="3.048cm" svg:height="2.54cm" svg:x="27.75cm" svg:y="43.452cm">
          <text:p text:style-name="P7"><text:span text:style-name="T5">Ithamar</text:span></text:p>
          <text:p text:style-name="P7"><text:span text:style-name="T6">Exo 6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9" xml:id="id3" draw:id="id3" draw:layer="layout" svg:width="3.048cm" svg:height="2.54cm" svg:x="19.981cm" svg:y="43.451cm">
          <text:p text:style-name="P4"><text:span text:style-name="T2">???</text:span></text:p>
          <text:p text:style-name="P4"><text:span text:style-name="T4">Exo 6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3" xml:id="id2" draw:id="id2" draw:layer="layout" svg:width="3.048cm" svg:height="2.54cm" svg:x="11.287cm" svg:y="38.47cm">
          <text:p text:style-name="P7"><text:span text:style-name="T5">Putiel</text:span></text:p>
          <text:p text:style-name="P7"><text:span text:style-name="T6">Exo 6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" draw:text-style-name="P1" xml:id="id4" draw:id="id4" draw:layer="layout" draw:type="curve" svg:x1="24.25cm" svg:y1="44.722cm" svg:x2="23.029cm" svg:y2="44.721cm" draw:start-shape="id35" draw:start-glue-point="3" draw:end-shape="id3" draw:end-glue-point="1" svg:d="M24250 44722c-915 0-305-1-1221-1" svg:viewBox="0 0 1222 2">
          <text:p/>
        </draw:connector>
        <draw:custom-shape draw:style-name="gr5" draw:text-style-name="P8" xml:id="id5" draw:id="id5" draw:layer="layout" svg:width="3.048cm" svg:height="2.54cm" svg:x="22.124cm" svg:y="47.452cm">
          <text:p text:style-name="P7"><text:span text:style-name="T5">Phinehas</text:span></text:p>
          <text:p text:style-name="P7"><text:span text:style-name="T6">Exo 6:25</text:span></text:p>
          <text:p text:style-name="P7"><text:span text:style-name="T6">Num 25:7,11</text:span></text:p>
          <text:p text:style-name="P7"><text:span text:style-name="T6">Jos 22:13</text:span></text:p>
          <text:p text:style-name="P7"><text:span text:style-name="T6">Jdg 20: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40" draw:id="id40" draw:layer="layout" svg:width="3.048cm" svg:height="2.54cm" svg:x="22.124cm" svg:y="50.652cm">
          <text:p text:style-name="P7"><text:span text:style-name="T5">Abishua</text:span></text:p>
          <text:p text:style-name="P7"><text:span text:style-name="T6">1Ch 6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41" draw:id="id41" draw:layer="layout" svg:width="3.048cm" svg:height="2.54cm" svg:x="22.124cm" svg:y="53.752cm">
          <text:p text:style-name="P7"><text:span text:style-name="T5">Bukki</text:span></text:p>
          <text:p text:style-name="P7"><text:span text:style-name="T6">1Ch 6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42" draw:id="id42" draw:layer="layout" svg:width="3.048cm" svg:height="2.54cm" svg:x="22.124cm" svg:y="56.752cm">
          <text:p text:style-name="P7"><text:span text:style-name="T5">Uzzi</text:span></text:p>
          <text:p text:style-name="P7"><text:span text:style-name="T6">1Ch 6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46" draw:id="id46" draw:layer="layout" svg:width="3.048cm" svg:height="2.54cm" svg:x="22.124cm" svg:y="59.752cm">
          <text:p text:style-name="P7"><text:span text:style-name="T5">Zerahiah</text:span></text:p>
          <text:p text:style-name="P7"><text:span text:style-name="T6">1Ch 6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48" draw:id="id48" draw:layer="layout" svg:width="3.048cm" svg:height="2.54cm" svg:x="22.124cm" svg:y="62.852cm">
          <text:p text:style-name="P7"><text:span text:style-name="T5">Meraioth</text:span></text:p>
          <text:p text:style-name="P7"><text:span text:style-name="T6">1Ch 6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49" draw:id="id49" draw:layer="layout" svg:width="3.048cm" svg:height="2.54cm" svg:x="22.124cm" svg:y="65.952cm">
          <text:p text:style-name="P7"><text:span text:style-name="T5">Amariah</text:span></text:p>
          <text:p text:style-name="P7"><text:span text:style-name="T6">1Ch 6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50" draw:id="id50" draw:layer="layout" svg:width="3.048cm" svg:height="2.54cm" svg:x="22.124cm" svg:y="69.052cm">
          <text:p text:style-name="P7"><text:span text:style-name="T5">Ahitub</text:span></text:p>
          <text:p text:style-name="P7"><text:span text:style-name="T6">1Ch 6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53" draw:id="id53" draw:layer="layout" svg:width="3.048cm" svg:height="2.54cm" svg:x="22.124cm" svg:y="72.252cm">
          <text:p text:style-name="P7"><text:span text:style-name="T5">Zadok</text:span></text:p>
          <text:p text:style-name="P7"><text:span text:style-name="T6">1Ch 6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54" draw:id="id54" draw:layer="layout" svg:width="3.048cm" svg:height="2.54cm" svg:x="22.124cm" svg:y="75.452cm">
          <text:p text:style-name="P7"><text:span text:style-name="T5">Ahimaaz</text:span></text:p>
          <text:p text:style-name="P7"><text:span text:style-name="T6">1Ch 6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34" draw:id="id34" draw:layer="layout" svg:width="3.048cm" svg:height="2.54cm" svg:x="22.124cm" svg:y="78.752cm">
          <text:p text:style-name="P7"><text:span text:style-name="T5">Azariah</text:span></text:p>
          <text:p text:style-name="P7"><text:span text:style-name="T6">1Ch 6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33" draw:id="id33" draw:layer="layout" svg:width="3.048cm" svg:height="2.54cm" svg:x="22.124cm" svg:y="82.052cm">
          <text:p text:style-name="P7"><text:span text:style-name="T5">Johanan</text:span></text:p>
          <text:p text:style-name="P7"><text:span text:style-name="T6">1Ch 6: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38" draw:id="id38" draw:layer="layout" svg:width="3.048cm" svg:height="2.54cm" svg:x="22.124cm" svg:y="85.352cm">
          <text:p text:style-name="P7"><text:span text:style-name="T5">Azariah</text:span></text:p>
          <text:p text:style-name="P7"><text:span text:style-name="T6">1Ch 6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12" draw:layer="layout" svg:width="8.213cm" svg:height="2.928cm" svg:x="21.906cm" svg:y="85.177cm">
          <text:p text:style-name="P11"><text:span text:style-name="T1">He it is that executed</text:span></text:p>
          <text:p text:style-name="P11"><text:span text:style-name="T1">the priest’s office in the</text:span></text:p>
          <text:p text:style-name="P11"><text:span text:style-name="T1">temple that Solomon built</text:span></text:p>
          <text:p text:style-name="P11"><text:span text:style-name="T1">In Jerusalem</text:span></text:p>
          <text:p text:style-name="P11"><text:span text:style-name="T9">1Ch 6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39" draw:id="id39" draw:layer="layout" svg:width="3.048cm" svg:height="2.54cm" svg:x="22.124cm" svg:y="88.752cm">
          <text:p text:style-name="P7"><text:span text:style-name="T5">Amariah</text:span></text:p>
          <text:p text:style-name="P7"><text:span text:style-name="T6">1Ch 6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43" draw:id="id43" draw:layer="layout" svg:width="3.048cm" svg:height="2.54cm" svg:x="22.124cm" svg:y="92.052cm">
          <text:p text:style-name="P7"><text:span text:style-name="T5">Ahitub</text:span></text:p>
          <text:p text:style-name="P7"><text:span text:style-name="T6">1Ch 6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44" draw:id="id44" draw:layer="layout" svg:width="3.048cm" svg:height="2.54cm" svg:x="22.124cm" svg:y="95.352cm">
          <text:p text:style-name="P7"><text:span text:style-name="T5">Zadok</text:span></text:p>
          <text:p text:style-name="P7"><text:span text:style-name="T6">1Ch 6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47" draw:id="id47" draw:layer="layout" svg:width="3.048cm" svg:height="2.54cm" svg:x="22.124cm" svg:y="98.652cm">
          <text:p text:style-name="P7"><text:span text:style-name="T5">Shallum</text:span></text:p>
          <text:p text:style-name="P7"><text:span text:style-name="T6">1Ch 6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51" draw:id="id51" draw:layer="layout" svg:width="3.048cm" svg:height="2.54cm" svg:x="22.124cm" svg:y="101.852cm">
          <text:p text:style-name="P7"><text:span text:style-name="T5">Hilkiah</text:span></text:p>
          <text:p text:style-name="P7"><text:span text:style-name="T6">1Ch 6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52" draw:id="id52" draw:layer="layout" svg:width="3.048cm" svg:height="2.54cm" svg:x="22.124cm" svg:y="105.052cm">
          <text:p text:style-name="P7"><text:span text:style-name="T5">Azariah</text:span></text:p>
          <text:p text:style-name="P7"><text:span text:style-name="T6">1Ch 6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55" draw:id="id55" draw:layer="layout" svg:width="3.048cm" svg:height="2.54cm" svg:x="22.124cm" svg:y="108.252cm">
          <text:p text:style-name="P7"><text:span text:style-name="T5">Seraiah</text:span></text:p>
          <text:p text:style-name="P7"><text:span text:style-name="T6">1Ch 6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8" xml:id="id56" draw:id="id56" draw:layer="layout" svg:width="3.048cm" svg:height="4.3cm" svg:x="22.124cm" svg:y="111.952cm">
          <text:p text:style-name="P7"><text:span text:style-name="T5">Jehozadak</text:span></text:p>
          <text:p text:style-name="P7"><text:span text:style-name="T6">1Ch 6:14</text:span></text:p>
          <text:p text:style-name="P10"><text:span text:style-name="T5">Josedech</text:span></text:p>
          <text:p text:style-name="P10"><text:span text:style-name="T6">Hag 1:1,12,14, 2:2,4</text:span></text:p>
          <text:p text:style-name="P10"><text:span text:style-name="T6">Zec 6:11</text:span></text:p>
          <text:p text:style-name="P10"><text:span text:style-name="T5">Jozadak</text:span></text:p>
          <text:p text:style-name="P10"><text:span text:style-name="T7">Ezra 3:2,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12" draw:layer="layout" svg:width="8.62cm" svg:height="4.64cm" svg:x="21.907cm" svg:y="111.777cm">
          <text:p text:style-name="P11"><text:span text:style-name="T1">Went into captivity, when</text:span></text:p>
          <text:p text:style-name="P11"><text:span text:style-name="T1">the LORD carried away</text:span></text:p>
          <text:p text:style-name="P11"><text:span text:style-name="T1">Judah and Jerusalem by the</text:span></text:p>
          <text:p text:style-name="P11"><text:span text:style-name="T1">hand of Nebuchadnezzar.</text:span></text:p>
          <text:p text:style-name="P11"><text:span text:style-name="T9">1Ch 6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3" draw:layer="layout" svg:width="12.43cm" svg:height="2.928cm" svg:x="12.907cm" svg:y="47.277cm">
          <text:p text:style-name="P2"><text:span text:style-name="T1">Wherefore say, Behold, I give unto him my</text:span></text:p>
          <text:p text:style-name="P2"><text:span text:style-name="T1">covenant of peace: And he shall have it, and his</text:span></text:p>
          <text:p text:style-name="P2"><text:span text:style-name="T1">seed after him, even the covenant of an </text:span><text:span text:style-name="T8">everlasting</text:span></text:p>
          <text:p text:style-name="P2"><text:span text:style-name="T8">priesthood</text:span><text:span text:style-name="T1">; because he was zealous for his God,</text:span></text:p>
          <text:p text:style-name="P2"><text:span text:style-name="T1">and made an atonement for the children of Israel.</text:span></text:p>
          <text:p text:style-name="P2"><text:span text:style-name="T9">Num 25:12,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65.189cm" svg:y1="33.242cm" svg:x2="65.517cm" svg:y2="30.786cm" svg:d="M65189 33242c0-1801 328-574 328-2456" svg:viewBox="0 0 329 2457">
          <text:p/>
        </draw:connector>
        <draw:connector draw:style-name="gr1" draw:text-style-name="P1" draw:layer="layout" draw:type="curve" svg:x1="66.189cm" svg:y1="33.242cm" svg:x2="66.517cm" svg:y2="30.786cm" svg:d="M66189 33242c0-1801 328-574 328-2456" svg:viewBox="0 0 329 2457">
          <text:p/>
        </draw:connector>
        <draw:connector draw:style-name="gr1" draw:text-style-name="P1" draw:layer="layout" draw:type="curve" svg:x1="67.189cm" svg:y1="33.242cm" svg:x2="67.517cm" svg:y2="30.786cm" svg:d="M67189 33242c0-1801 328-574 328-2456" svg:viewBox="0 0 329 2457">
          <text:p/>
        </draw:connector>
        <draw:connector draw:style-name="gr1" draw:text-style-name="P1" draw:layer="layout" draw:type="curve" svg:x1="68.189cm" svg:y1="33.242cm" svg:x2="68.517cm" svg:y2="30.786cm" svg:d="M68189 33242c0-1801 328-574 328-2456" svg:viewBox="0 0 329 2457">
          <text:p/>
        </draw:connector>
        <draw:connector draw:style-name="gr1" draw:text-style-name="P1" draw:layer="layout" draw:type="curve" svg:x1="69.189cm" svg:y1="33.242cm" svg:x2="69.517cm" svg:y2="30.786cm" svg:d="M69189 33242c0-1801 328-574 328-2456" svg:viewBox="0 0 329 2457">
          <text:p/>
        </draw:connector>
        <draw:connector draw:style-name="gr1" draw:text-style-name="P1" draw:layer="layout" draw:type="curve" svg:x1="70.189cm" svg:y1="33.242cm" svg:x2="70.517cm" svg:y2="30.786cm" svg:d="M70189 33242c0-1801 328-574 328-2456" svg:viewBox="0 0 329 2457">
          <text:p/>
        </draw:connector>
        <draw:connector draw:style-name="gr1" draw:text-style-name="P1" draw:layer="layout" draw:type="curve" svg:x1="71.189cm" svg:y1="33.242cm" svg:x2="71.517cm" svg:y2="30.786cm" svg:d="M71189 33242c0-1801 328-574 328-2456" svg:viewBox="0 0 329 2457">
          <text:p/>
        </draw:connector>
        <draw:connector draw:style-name="gr1" draw:text-style-name="P1" draw:layer="layout" draw:type="curve" svg:x1="72.189cm" svg:y1="33.242cm" svg:x2="72.517cm" svg:y2="30.786cm" svg:d="M72189 33242c0-1801 328-574 328-2456" svg:viewBox="0 0 329 2457">
          <text:p/>
        </draw:connector>
        <draw:connector draw:style-name="gr1" draw:text-style-name="P1" draw:layer="layout" draw:type="curve" svg:x1="72.189cm" svg:y1="36.242cm" svg:x2="72.517cm" svg:y2="33.786cm" svg:d="M72189 36242c0-1801 328-574 328-2456" svg:viewBox="0 0 329 2457">
          <text:p/>
        </draw:connector>
        <draw:connector draw:style-name="gr1" draw:text-style-name="P1" draw:layer="layout" draw:type="curve" svg:x1="73.189cm" svg:y1="33.242cm" svg:x2="73.517cm" svg:y2="30.786cm" svg:d="M73189 33242c0-1801 328-574 328-2456" svg:viewBox="0 0 329 2457">
          <text:p/>
        </draw:connector>
        <draw:connector draw:style-name="gr1" draw:text-style-name="P1" draw:layer="layout" draw:type="curve" svg:x1="74.189cm" svg:y1="33.242cm" svg:x2="74.517cm" svg:y2="30.786cm" svg:d="M74189 33242c0-1801 328-574 328-2456" svg:viewBox="0 0 329 2457">
          <text:p/>
        </draw:connector>
        <draw:connector draw:style-name="gr1" draw:text-style-name="P1" draw:layer="layout" draw:type="curve" svg:x1="75.189cm" svg:y1="33.242cm" svg:x2="75.517cm" svg:y2="30.786cm" svg:d="M75189 33242c0-1801 328-574 328-2456" svg:viewBox="0 0 329 2457">
          <text:p/>
        </draw:connector>
        <draw:connector draw:style-name="gr1" draw:text-style-name="P1" draw:layer="layout" draw:type="curve" svg:x1="76.189cm" svg:y1="33.242cm" svg:x2="76.517cm" svg:y2="30.786cm" svg:d="M76189 33242c0-1801 328-574 328-2456" svg:viewBox="0 0 329 2457">
          <text:p/>
        </draw:connector>
        <draw:connector draw:style-name="gr1" draw:text-style-name="P1" draw:layer="layout" draw:type="curve" svg:x1="77.189cm" svg:y1="33.242cm" svg:x2="77.517cm" svg:y2="30.786cm" svg:d="M77189 33242c0-1801 328-574 328-2456" svg:viewBox="0 0 329 2457">
          <text:p/>
        </draw:connector>
        <draw:connector draw:style-name="gr1" draw:text-style-name="P1" draw:layer="layout" draw:type="curve" svg:x1="23.748cm" svg:y1="21.352cm" svg:x2="23.748cm" svg:y2="20.892cm" draw:start-shape="id64" draw:start-glue-point="0" draw:end-shape="id65" draw:end-glue-point="2" svg:d="M23748 21352v-460" svg:viewBox="0 0 1 461">
          <text:p/>
        </draw:connector>
        <draw:connector draw:style-name="gr1" draw:text-style-name="P1" draw:layer="layout" draw:type="curve" svg:x1="23.748cm" svg:y1="24.452cm" svg:x2="23.748cm" svg:y2="23.892cm" draw:start-shape="id66" draw:start-glue-point="0" draw:end-shape="id64" draw:end-glue-point="2" svg:d="M23748 24452v-560" svg:viewBox="0 0 1 561">
          <text:p/>
        </draw:connector>
        <draw:connector draw:style-name="gr1" draw:text-style-name="P1" draw:layer="layout" draw:type="curve" svg:x1="23.748cm" svg:y1="27.552cm" svg:x2="23.748cm" svg:y2="26.992cm" draw:start-shape="id67" draw:start-glue-point="0" draw:end-shape="id66" draw:end-glue-point="2" svg:d="M23748 27552v-560" svg:viewBox="0 0 1 561">
          <text:p/>
        </draw:connector>
        <draw:connector draw:style-name="gr1" draw:text-style-name="P1" draw:layer="layout" draw:type="curve" svg:x1="23.748cm" svg:y1="30.652cm" svg:x2="23.748cm" svg:y2="30.092cm" draw:start-shape="id68" draw:start-glue-point="0" draw:end-shape="id67" draw:end-glue-point="2" svg:d="M23748 30652v-560" svg:viewBox="0 0 1 561">
          <text:p/>
        </draw:connector>
        <draw:connector draw:style-name="gr1" draw:text-style-name="P1" draw:layer="layout" draw:type="curve" svg:x1="23.748cm" svg:y1="33.852cm" svg:x2="23.748cm" svg:y2="33.192cm" draw:start-shape="id69" draw:start-glue-point="0" draw:end-shape="id68" draw:end-glue-point="2" svg:d="M23748 33852v-660" svg:viewBox="0 0 1 661">
          <text:p/>
        </draw:connector>
        <draw:custom-shape draw:style-name="gr5" draw:text-style-name="P8" xml:id="id65" draw:id="id65" draw:layer="layout" svg:width="3.048cm" svg:height="2.54cm" svg:x="22.224cm" svg:y="18.352cm">
          <text:p text:style-name="P7"><text:span text:style-name="T5">Jahath</text:span></text:p>
          <text:p text:style-name="P7"><text:span text:style-name="T6">1Ch 6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64" draw:id="id64" draw:layer="layout" svg:width="3.048cm" svg:height="2.54cm" svg:x="22.224cm" svg:y="21.352cm">
          <text:p text:style-name="P7"><text:span text:style-name="T5">Zimmah</text:span></text:p>
          <text:p text:style-name="P7"><text:span text:style-name="T6">1Ch 6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66" draw:id="id66" draw:layer="layout" svg:width="3.048cm" svg:height="2.54cm" svg:x="22.224cm" svg:y="24.452cm">
          <text:p text:style-name="P7"><text:span text:style-name="T5">Joah</text:span></text:p>
          <text:p text:style-name="P7"><text:span text:style-name="T6">1Ch 6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67" draw:id="id67" draw:layer="layout" svg:width="3.048cm" svg:height="2.54cm" svg:x="22.224cm" svg:y="27.552cm">
          <text:p text:style-name="P7"><text:span text:style-name="T5">Iddo</text:span></text:p>
          <text:p text:style-name="P7"><text:span text:style-name="T6">1Ch 6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68" draw:id="id68" draw:layer="layout" svg:width="3.048cm" svg:height="2.54cm" svg:x="22.224cm" svg:y="30.652cm">
          <text:p text:style-name="P7"><text:span text:style-name="T5">Zerah</text:span></text:p>
          <text:p text:style-name="P7"><text:span text:style-name="T6">1Ch 6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69" draw:id="id69" draw:layer="layout" svg:width="3.048cm" svg:height="2.54cm" svg:x="22.224cm" svg:y="33.852cm">
          <text:p text:style-name="P7"><text:span text:style-name="T5">Jeaterai</text:span></text:p>
          <text:p text:style-name="P7"><text:span text:style-name="T6">1Ch 6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23.747cm" svg:y1="17.687cm" svg:x2="23.748cm" svg:y2="18.352cm" draw:start-shape="id21" draw:start-glue-point="2" draw:end-shape="id65" draw:end-glue-point="0" svg:d="M23747 17687c0 499 1 167 1 665" svg:viewBox="0 0 2 666">
          <text:p/>
        </draw:connector>
        <draw:connector draw:style-name="gr1" draw:text-style-name="P1" draw:layer="layout" draw:type="curve" svg:x1="33.67cm" svg:y1="51.157cm" svg:x2="33.67cm" svg:y2="49.997cm" draw:start-shape="id70" draw:start-glue-point="0" draw:end-shape="id57" draw:end-glue-point="2" svg:d="M33670 51157v-1160" svg:viewBox="0 0 1 1161">
          <text:p/>
        </draw:connector>
        <draw:connector draw:style-name="gr1" draw:text-style-name="P1" draw:layer="layout" draw:type="curve" svg:x1="33.67cm" svg:y1="54.157cm" svg:x2="33.67cm" svg:y2="53.697cm" draw:start-shape="id71" draw:start-glue-point="0" draw:end-shape="id70" draw:end-glue-point="2" svg:d="M33670 54157v-460" svg:viewBox="0 0 1 461">
          <text:p/>
        </draw:connector>
        <draw:connector draw:style-name="gr1" draw:text-style-name="P1" draw:layer="layout" draw:type="curve" svg:x1="33.67cm" svg:y1="57.157cm" svg:x2="33.67cm" svg:y2="56.697cm" draw:start-shape="id72" draw:start-glue-point="0" draw:end-shape="id71" draw:end-glue-point="2" svg:d="M33670 57157v-460" svg:viewBox="0 0 1 461">
          <text:p/>
        </draw:connector>
        <draw:connector draw:style-name="gr1" draw:text-style-name="P1" draw:layer="layout" draw:type="curve" svg:x1="33.67cm" svg:y1="60.257cm" svg:x2="33.67cm" svg:y2="59.697cm" draw:start-shape="id73" draw:start-glue-point="0" draw:end-shape="id72" draw:end-glue-point="2" svg:d="M33670 60257v-560" svg:viewBox="0 0 1 561">
          <text:p/>
        </draw:connector>
        <draw:connector draw:style-name="gr1" draw:text-style-name="P1" draw:layer="layout" draw:type="curve" svg:x1="33.67cm" svg:y1="63.357cm" svg:x2="33.67cm" svg:y2="62.797cm" draw:start-shape="id74" draw:start-glue-point="0" draw:end-shape="id73" draw:end-glue-point="2" svg:d="M33670 63357v-560" svg:viewBox="0 0 1 561">
          <text:p/>
        </draw:connector>
        <draw:connector draw:style-name="gr1" draw:text-style-name="P1" draw:layer="layout" draw:type="curve" svg:x1="33.67cm" svg:y1="66.457cm" svg:x2="33.67cm" svg:y2="65.897cm" draw:start-shape="id75" draw:start-glue-point="0" draw:end-shape="id74" draw:end-glue-point="2" svg:d="M33670 66457v-560" svg:viewBox="0 0 1 561">
          <text:p/>
        </draw:connector>
        <draw:custom-shape draw:style-name="gr5" draw:text-style-name="P8" xml:id="id57" draw:id="id57" draw:layer="layout" svg:width="3.048cm" svg:height="2.54cm" svg:x="32.146cm" svg:y="47.457cm">
          <text:p text:style-name="P7"><text:span text:style-name="T5">Elkanah</text:span></text:p>
          <text:p text:style-name="P7"><text:span text:style-name="T6">1Ch 6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70" draw:id="id70" draw:layer="layout" svg:width="3.048cm" svg:height="2.54cm" svg:x="32.146cm" svg:y="51.157cm">
          <text:p text:style-name="P7"><text:span text:style-name="T5">Ebiasaph</text:span></text:p>
          <text:p text:style-name="P7"><text:span text:style-name="T6">1Ch 6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71" draw:id="id71" draw:layer="layout" svg:width="3.048cm" svg:height="2.54cm" svg:x="32.146cm" svg:y="54.157cm">
          <text:p text:style-name="P7"><text:span text:style-name="T5">Assir</text:span></text:p>
          <text:p text:style-name="P7"><text:span text:style-name="T6">1Ch 6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72" draw:id="id72" draw:layer="layout" svg:width="3.048cm" svg:height="2.54cm" svg:x="32.146cm" svg:y="57.157cm">
          <text:p text:style-name="P7"><text:span text:style-name="T5">Tahath</text:span></text:p>
          <text:p text:style-name="P7"><text:span text:style-name="T6">1Ch 6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73" draw:id="id73" draw:layer="layout" svg:width="3.048cm" svg:height="2.54cm" svg:x="32.146cm" svg:y="60.257cm">
          <text:p text:style-name="P7"><text:span text:style-name="T5">Uriel</text:span></text:p>
          <text:p text:style-name="P7"><text:span text:style-name="T6">1Ch 6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74" draw:id="id74" draw:layer="layout" svg:width="3.048cm" svg:height="2.54cm" svg:x="32.146cm" svg:y="63.357cm">
          <text:p text:style-name="P7"><text:span text:style-name="T5">Uzziah</text:span></text:p>
          <text:p text:style-name="P7"><text:span text:style-name="T6">1Ch 6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75" draw:id="id75" draw:layer="layout" svg:width="3.048cm" svg:height="2.54cm" svg:x="32.146cm" svg:y="66.457cm">
          <text:p text:style-name="P7"><text:span text:style-name="T5">Shaul</text:span></text:p>
          <text:p text:style-name="P7"><text:span text:style-name="T6">1Ch 6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56.948cm" svg:y1="21.753cm" svg:x2="56.948cm" svg:y2="21.293cm" draw:start-shape="id76" draw:start-glue-point="0" draw:end-shape="id77" draw:end-glue-point="2" svg:d="M56948 21753v-460" svg:viewBox="0 0 1 461">
          <text:p/>
        </draw:connector>
        <draw:connector draw:style-name="gr1" draw:text-style-name="P1" draw:layer="layout" draw:type="curve" svg:x1="56.948cm" svg:y1="24.853cm" svg:x2="56.948cm" svg:y2="24.293cm" draw:start-shape="id78" draw:start-glue-point="0" draw:end-shape="id76" draw:end-glue-point="2" svg:d="M56948 24853v-560" svg:viewBox="0 0 1 561">
          <text:p/>
        </draw:connector>
        <draw:connector draw:style-name="gr1" draw:text-style-name="P1" draw:layer="layout" draw:type="curve" svg:x1="56.948cm" svg:y1="27.953cm" svg:x2="56.948cm" svg:y2="27.393cm" draw:start-shape="id79" draw:start-glue-point="0" draw:end-shape="id78" draw:end-glue-point="2" svg:d="M56948 27953v-560" svg:viewBox="0 0 1 561">
          <text:p/>
        </draw:connector>
        <draw:connector draw:style-name="gr1" draw:text-style-name="P1" draw:layer="layout" draw:type="curve" svg:x1="56.948cm" svg:y1="31.053cm" svg:x2="56.948cm" svg:y2="30.493cm" draw:start-shape="id80" draw:start-glue-point="0" draw:end-shape="id79" draw:end-glue-point="2" svg:d="M56948 31053v-560" svg:viewBox="0 0 1 561">
          <text:p/>
        </draw:connector>
        <draw:connector draw:style-name="gr1" draw:text-style-name="P1" draw:layer="layout" draw:type="curve" svg:x1="56.948cm" svg:y1="34.253cm" svg:x2="56.948cm" svg:y2="33.593cm" draw:start-shape="id81" draw:start-glue-point="0" draw:end-shape="id80" draw:end-glue-point="2" svg:d="M56948 34253v-660" svg:viewBox="0 0 1 661">
          <text:p/>
        </draw:connector>
        <draw:custom-shape draw:style-name="gr5" draw:text-style-name="P8" xml:id="id77" draw:id="id77" draw:layer="layout" svg:width="3.048cm" svg:height="2.54cm" svg:x="55.424cm" svg:y="18.753cm">
          <text:p text:style-name="P7"><text:span text:style-name="T5">Libni</text:span></text:p>
          <text:p text:style-name="P7"><text:span text:style-name="T6">1Ch 6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76" draw:id="id76" draw:layer="layout" svg:width="3.048cm" svg:height="2.54cm" svg:x="55.424cm" svg:y="21.753cm">
          <text:p text:style-name="P7"><text:span text:style-name="T5">Shimei</text:span></text:p>
          <text:p text:style-name="P7"><text:span text:style-name="T6">1Ch 6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78" draw:id="id78" draw:layer="layout" svg:width="3.048cm" svg:height="2.54cm" svg:x="55.424cm" svg:y="24.853cm">
          <text:p text:style-name="P7"><text:span text:style-name="T5">Uzza</text:span></text:p>
          <text:p text:style-name="P7"><text:span text:style-name="T6">1Ch 6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79" draw:id="id79" draw:layer="layout" svg:width="3.048cm" svg:height="2.54cm" svg:x="55.424cm" svg:y="27.953cm">
          <text:p text:style-name="P7"><text:span text:style-name="T5">Shimea</text:span></text:p>
          <text:p text:style-name="P7"><text:span text:style-name="T6">1Ch 6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80" draw:id="id80" draw:layer="layout" svg:width="3.048cm" svg:height="2.54cm" svg:x="55.424cm" svg:y="31.053cm">
          <text:p text:style-name="P7"><text:span text:style-name="T5">Haggiah</text:span></text:p>
          <text:p text:style-name="P7"><text:span text:style-name="T6">1Ch 6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81" draw:id="id81" draw:layer="layout" svg:width="3.048cm" svg:height="2.54cm" svg:x="55.424cm" svg:y="34.253cm">
          <text:p text:style-name="P7"><text:span text:style-name="T5">Asaiah</text:span></text:p>
          <text:p text:style-name="P7"><text:span text:style-name="T6">1Ch 6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56.944cm" svg:y1="18.167cm" svg:x2="56.948cm" svg:y2="18.753cm" draw:start-shape="id24" draw:start-glue-point="2" draw:end-shape="id77" draw:end-glue-point="0" svg:d="M56944 18167c0 441 4 148 4 586" svg:viewBox="0 0 5 587">
          <text:p/>
        </draw:connector>
        <draw:custom-shape draw:style-name="gr11" draw:text-style-name="P8" xml:id="id82" draw:id="id82" draw:layer="layout" svg:width="3.048cm" svg:height="2.54cm" svg:x="22.124cm" svg:y="117.352cm">
          <text:p text:style-name="P7"><text:span text:style-name="T5">Joshua</text:span></text:p>
          <text:p text:style-name="P7"><text:span text:style-name="T6">Hag 1:1</text:span></text:p>
          <text:p text:style-name="P7"><text:span text:style-name="T6">Zec 6:11</text:span></text:p>
          <text:p text:style-name="P7"><text:span text:style-name="T5">Jeshua</text:span></text:p>
          <text:p text:style-name="P7"><text:span text:style-name="T7">Ezra 3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1" draw:layer="layout" draw:type="curve" svg:x1="23.648cm" svg:y1="116.252cm" svg:x2="23.648cm" svg:y2="117.352cm" draw:start-shape="id56" draw:start-glue-point="2" draw:end-shape="id82" draw:end-glue-point="0" svg:d="M23648 116252v1100" svg:viewBox="0 0 1 1101">
          <text:p/>
        </draw:connector>
        <draw:custom-shape draw:style-name="gr21" draw:text-style-name="P8" xml:id="id90" draw:id="id90" draw:layer="layout" svg:width="3.048cm" svg:height="2.54cm" svg:x="28.546cm" svg:y="51.157cm">
          <text:p text:style-name="P7"><text:span text:style-name="T5">Amasai</text:span></text:p>
          <text:p text:style-name="P7"><text:span text:style-name="T6">1Ch 6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8" xml:id="id89" draw:id="id89" draw:layer="layout" svg:width="3.048cm" svg:height="2.54cm" svg:x="35.746cm" svg:y="51.157cm">
          <text:p text:style-name="P7"><text:span text:style-name="T5">Ahimoth</text:span></text:p>
          <text:p text:style-name="P7"><text:span text:style-name="T6">1Ch 6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42.67cm" svg:y1="50.557cm" svg:x2="42.67cm" svg:y2="49.997cm" draw:start-shape="id83" draw:start-glue-point="0" draw:end-shape="id1" draw:end-glue-point="2" svg:d="M42670 50557v-560" svg:viewBox="0 0 1 561">
          <text:p/>
        </draw:connector>
        <draw:connector draw:style-name="gr1" draw:text-style-name="P1" draw:layer="layout" draw:type="curve" svg:x1="42.67cm" svg:y1="53.557cm" svg:x2="42.67cm" svg:y2="53.097cm" draw:start-shape="id84" draw:start-glue-point="0" draw:end-shape="id83" draw:end-glue-point="2" svg:d="M42670 53557v-460" svg:viewBox="0 0 1 461">
          <text:p/>
        </draw:connector>
        <draw:connector draw:style-name="gr1" draw:text-style-name="P1" draw:layer="layout" draw:type="curve" svg:x1="42.67cm" svg:y1="56.557cm" svg:x2="42.67cm" svg:y2="56.097cm" draw:start-shape="id85" draw:start-glue-point="0" draw:end-shape="id84" draw:end-glue-point="2" svg:d="M42670 56557v-460" svg:viewBox="0 0 1 461">
          <text:p/>
        </draw:connector>
        <draw:connector draw:style-name="gr1" draw:text-style-name="P1" draw:layer="layout" draw:type="curve" svg:x1="42.67cm" svg:y1="59.657cm" svg:x2="42.67cm" svg:y2="59.097cm" draw:start-shape="id86" draw:start-glue-point="0" draw:end-shape="id85" draw:end-glue-point="2" svg:d="M42670 59657v-560" svg:viewBox="0 0 1 561">
          <text:p/>
        </draw:connector>
        <draw:connector draw:style-name="gr1" draw:text-style-name="P1" draw:layer="layout" draw:type="curve" svg:x1="42.67cm" svg:y1="62.757cm" svg:x2="42.67cm" svg:y2="62.197cm" draw:start-shape="id87" draw:start-glue-point="0" draw:end-shape="id86" draw:end-glue-point="2" svg:d="M42670 62757v-560" svg:viewBox="0 0 1 561">
          <text:p/>
        </draw:connector>
        <draw:connector draw:style-name="gr1" draw:text-style-name="P1" draw:layer="layout" draw:type="curve" svg:x1="42.67cm" svg:y1="66.457cm" svg:x2="42.67cm" svg:y2="65.297cm" draw:start-shape="id88" draw:start-glue-point="0" draw:end-shape="id87" draw:end-glue-point="2" svg:d="M42670 66457v-1160" svg:viewBox="0 0 1 1161">
          <text:p/>
        </draw:connector>
        <draw:custom-shape draw:style-name="gr21" draw:text-style-name="P8" xml:id="id1" draw:id="id1" draw:layer="layout" svg:width="3.048cm" svg:height="2.54cm" svg:x="41.146cm" svg:y="47.457cm">
          <text:p text:style-name="P7"><text:span text:style-name="T5">Zophai</text:span></text:p>
          <text:p text:style-name="P7"><text:span text:style-name="T6">1Ch 6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8" xml:id="id83" draw:id="id83" draw:layer="layout" svg:width="3.048cm" svg:height="2.54cm" svg:x="41.146cm" svg:y="50.557cm">
          <text:p text:style-name="P7"><text:span text:style-name="T5">Nahath</text:span></text:p>
          <text:p text:style-name="P7"><text:span text:style-name="T6">1Ch 6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8" xml:id="id84" draw:id="id84" draw:layer="layout" svg:width="3.048cm" svg:height="2.54cm" svg:x="41.146cm" svg:y="53.557cm">
          <text:p text:style-name="P7"><text:span text:style-name="T5">Eliab</text:span></text:p>
          <text:p text:style-name="P7"><text:span text:style-name="T6">1Ch 6: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8" xml:id="id85" draw:id="id85" draw:layer="layout" svg:width="3.048cm" svg:height="2.54cm" svg:x="41.146cm" svg:y="56.557cm">
          <text:p text:style-name="P7"><text:span text:style-name="T5">Jeroham</text:span></text:p>
          <text:p text:style-name="P7"><text:span text:style-name="T6">1Ch 6: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8" xml:id="id86" draw:id="id86" draw:layer="layout" svg:width="3.048cm" svg:height="2.54cm" svg:x="41.146cm" svg:y="59.657cm">
          <text:p text:style-name="P7"><text:span text:style-name="T5">Elkanah</text:span></text:p>
          <text:p text:style-name="P7"><text:span text:style-name="T6">1Ch 6: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8" xml:id="id87" draw:id="id87" draw:layer="layout" svg:width="3.048cm" svg:height="2.54cm" svg:x="41.146cm" svg:y="62.757cm">
          <text:p text:style-name="P7"><text:span text:style-name="T5">Samuel</text:span></text:p>
          <text:p text:style-name="P7"><text:span text:style-name="T6">1Ch 6: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8" xml:id="id88" draw:id="id88" draw:layer="layout" svg:width="3.048cm" svg:height="2.54cm" svg:x="41.146cm" svg:y="66.457cm">
          <text:p text:style-name="P7"><text:span text:style-name="T5">Vashni</text:span></text:p>
          <text:p text:style-name="P7"><text:span text:style-name="T6">1Ch 6: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8" xml:id="id91" draw:id="id91" draw:layer="layout" svg:width="3.048cm" svg:height="2.54cm" svg:x="45.046cm" svg:y="66.457cm">
          <text:p text:style-name="P7"><text:span text:style-name="T5">Abiah</text:span></text:p>
          <text:p text:style-name="P7"><text:span text:style-name="T6">1Ch 6: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36.715cm" svg:y1="50.069cm" svg:x2="37.27cm" svg:y2="51.157cm" draw:end-shape="id89" draw:end-glue-point="0" svg:d="M36715 50069c0 441 555-103 555 1088" svg:viewBox="0 0 556 1089">
          <text:p/>
        </draw:connector>
        <draw:connector draw:style-name="gr1" draw:text-style-name="P1" draw:layer="layout" draw:type="curve" svg:x1="30.25cm" svg:y1="49.646cm" svg:x2="30.07cm" svg:y2="51.157cm" draw:end-shape="id90" draw:end-glue-point="0" svg:d="M30250 49646c0 757-180 2-180 1511" svg:viewBox="0 0 181 1512">
          <text:p/>
        </draw:connector>
        <draw:connector draw:style-name="gr1" draw:text-style-name="P1" draw:layer="layout" draw:type="curve" svg:x1="42.67cm" svg:y1="65.297cm" svg:x2="46.57cm" svg:y2="66.457cm" draw:start-shape="id87" draw:start-glue-point="2" draw:end-shape="id91" draw:end-glue-point="0" svg:d="M42670 65297c0 871 3900 292 3900 1160" svg:viewBox="0 0 3901 1161">
          <text:p/>
        </draw:connector>
        <draw:custom-shape draw:style-name="gr5" draw:text-style-name="P8" xml:id="id92" draw:id="id92" draw:layer="layout" svg:width="3.048cm" svg:height="2.54cm" svg:x="10.124cm" svg:y="111.952cm">
          <text:p text:style-name="P7"><text:span text:style-name="T5">Ezra</text:span></text:p>
          <text:p text:style-name="P7"><text:span text:style-name="T7">Ezr 7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" draw:text-style-name="P1" draw:layer="layout" draw:type="curve" svg:x1="23.648cm" svg:y1="110.792cm" svg:x2="11.648cm" svg:y2="111.952cm" draw:start-shape="id55" draw:start-glue-point="2" draw:end-shape="id92" draw:end-glue-point="0" svg:d="M23648 110792c0 871-12000 292-12000 1160" svg:viewBox="0 0 12001 1161">
          <text:p/>
        </draw:connector>
        <draw:custom-shape draw:style-name="gr5" draw:text-style-name="P8" draw:layer="layout" svg:width="3.048cm" svg:height="2.54cm" svg:x="26.324cm" svg:y="120.352cm">
          <text:p text:style-name="P7"><text:span text:style-name="T5">Maaseiah</text:span></text:p>
          <text:p text:style-name="P7"><text:span text:style-name="T6">Ezra 10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draw:layer="layout" svg:width="3.048cm" svg:height="2.54cm" svg:x="29.824cm" svg:y="120.352cm">
          <text:p text:style-name="P7"><text:span text:style-name="T5">Eliezer</text:span></text:p>
          <text:p text:style-name="P10"><text:span text:style-name="T6">Ezra 10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draw:layer="layout" svg:width="3.048cm" svg:height="2.54cm" svg:x="33.224cm" svg:y="120.352cm">
          <text:p text:style-name="P7"><text:span text:style-name="T5">Jarib</text:span></text:p>
          <text:p text:style-name="P10"><text:span text:style-name="T6">Ezra 10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draw:layer="layout" svg:width="3.048cm" svg:height="2.54cm" svg:x="36.724cm" svg:y="120.352cm">
          <text:p text:style-name="P7"><text:span text:style-name="T5">Gedaliah</text:span></text:p>
          <text:p text:style-name="P10"><text:span text:style-name="T6">Ezra 10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2" draw:layer="layout" svg:width="21.001cm" svg:height="3.193cm" svg:x="26.107cm" svg:y="119.967cm">
          <text:p text:style-name="P11"><text:span text:style-name="T1">And among the sons of the priests there</text:span></text:p>
          <text:p text:style-name="P11"><text:span text:style-name="T1">were found that had taken strange wives:</text:span></text:p>
          <text:p text:style-name="P11"><text:span text:style-name="T1">namely, of the sons of Jeshua the son</text:span></text:p>
          <text:p text:style-name="P11"><text:span text:style-name="T1">of Jozadak, </text:span><text:span text:style-name="T10">and his brethren</text:span><text:span text:style-name="T1">; Maaseiah,</text:span></text:p>
          <text:p text:style-name="P11"><text:span text:style-name="T1">and Eliezer, and Jarib, and Gedaliah.</text:span></text:p>
          <text:p text:style-name="P11"><text:span text:style-name="T9">Ezra 10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101" draw:id="id101" draw:layer="layout" svg:width="3.048cm" svg:height="2.54cm" svg:x="22.124cm" svg:y="120.352cm">
          <text:p text:style-name="P7"><text:span text:style-name="T5">Joiakim</text:span></text:p>
          <text:p text:style-name="P7"><text:span text:style-name="T6">Neh 12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100" draw:id="id100" draw:layer="layout" svg:width="3.048cm" svg:height="2.54cm" svg:x="22.124cm" svg:y="123.452cm">
          <text:p text:style-name="P7"><text:span text:style-name="T5">Eliashib</text:span></text:p>
          <text:p text:style-name="P7"><text:span text:style-name="T6">Neh 12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98" draw:id="id98" draw:layer="layout" svg:width="3.048cm" svg:height="2.54cm" svg:x="22.124cm" svg:y="126.752cm">
          <text:p text:style-name="P7"><text:span text:style-name="T5">Joiada</text:span></text:p>
          <text:p text:style-name="P7"><text:span text:style-name="T6">Neh 12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97" draw:id="id97" draw:layer="layout" svg:width="3.048cm" svg:height="2.54cm" svg:x="22.124cm" svg:y="129.852cm">
          <text:p text:style-name="P7"><text:span text:style-name="T5">Jonathan</text:span></text:p>
          <text:p text:style-name="P7"><text:span text:style-name="T6">Neh 12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99" draw:id="id99" draw:layer="layout" svg:width="3.048cm" svg:height="2.54cm" svg:x="22.124cm" svg:y="132.952cm">
          <text:p text:style-name="P7"><text:span text:style-name="T5">Jaddua</text:span></text:p>
          <text:p text:style-name="P7"><text:span text:style-name="T6">Neh 12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95" draw:id="id95" draw:layer="layout" svg:width="3.048cm" svg:height="2.54cm" svg:x="18.124cm" svg:y="120.352cm">
          <text:p text:style-name="P7"><text:span text:style-name="T5">Meraiah</text:span></text:p>
          <text:p text:style-name="P7"><text:span text:style-name="T6">Neh 12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1" draw:layer="layout" draw:type="curve" svg:x1="15.648cm" svg:y1="120.352cm" svg:x2="15.648cm" svg:y2="118.692cm" draw:start-shape="id93" draw:start-glue-point="0" draw:end-shape="id94" draw:end-glue-point="2" svg:d="M15648 120352v-1660" svg:viewBox="0 0 1 1661">
          <text:p/>
        </draw:connector>
        <draw:connector draw:style-name="gr2" draw:text-style-name="P1" draw:layer="layout" draw:type="curve" draw:line-skew="-3.369cm" svg:x1="19.648cm" svg:y1="120.352cm" svg:x2="23.648cm" svg:y2="110.792cm" draw:start-shape="id95" draw:start-glue-point="0" draw:end-shape="id55" draw:end-glue-point="2" svg:d="M19648 120352c0-12222 4000-7442 4000-9560" svg:viewBox="0 0 4001 9561">
          <text:p/>
        </draw:connector>
        <draw:custom-shape draw:style-name="gr5" draw:text-style-name="P8" xml:id="id93" draw:id="id93" draw:layer="layout" svg:width="3.048cm" svg:height="2.54cm" svg:x="14.124cm" svg:y="120.352cm">
          <text:p text:style-name="P7"><text:span text:style-name="T5">Hananiah</text:span></text:p>
          <text:p text:style-name="P7"><text:span text:style-name="T6">Neh 12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94" draw:id="id94" draw:layer="layout" svg:width="3.048cm" svg:height="2.54cm" svg:x="14.124cm" svg:y="116.152cm">
          <text:p text:style-name="P7"><text:span text:style-name="T5">Jeremiah</text:span></text:p>
          <text:p text:style-name="P7"><text:span text:style-name="T6">Neh 12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8" xml:id="id96" draw:id="id96" draw:layer="layout" svg:width="3.048cm" svg:height="2.54cm" svg:x="10.124cm" svg:y="120.352cm">
          <text:p text:style-name="P7"><text:span text:style-name="T5">Meshullam</text:span></text:p>
          <text:p text:style-name="P7"><text:span text:style-name="T6">Neh 12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1" draw:layer="layout" draw:type="curve" svg:x1="11.648cm" svg:y1="114.492cm" svg:x2="11.648cm" svg:y2="120.352cm" draw:start-shape="id92" draw:start-glue-point="2" draw:end-shape="id96" draw:end-glue-point="0" svg:d="M11648 114492v5860" svg:viewBox="0 0 1 5861">
          <text:p/>
        </draw:connector>
        <draw:connector draw:style-name="gr1" draw:text-style-name="P1" draw:layer="layout" draw:type="curve" svg:x1="23.648cm" svg:y1="129.852cm" svg:x2="23.648cm" svg:y2="129.292cm" draw:start-shape="id97" draw:start-glue-point="0" draw:end-shape="id98" draw:end-glue-point="2" svg:d="M23648 129852v-560" svg:viewBox="0 0 1 561">
          <text:p/>
        </draw:connector>
        <draw:connector draw:style-name="gr1" draw:text-style-name="P1" draw:layer="layout" draw:type="curve" svg:x1="23.648cm" svg:y1="132.952cm" svg:x2="23.648cm" svg:y2="132.392cm" draw:start-shape="id99" draw:start-glue-point="0" draw:end-shape="id97" draw:end-glue-point="2" svg:d="M23648 132952v-560" svg:viewBox="0 0 1 561">
          <text:p/>
        </draw:connector>
        <draw:connector draw:style-name="gr1" draw:text-style-name="P1" draw:layer="layout" draw:type="curve" svg:x1="23.648cm" svg:y1="126.752cm" svg:x2="23.648cm" svg:y2="125.992cm" draw:start-shape="id98" draw:start-glue-point="0" draw:end-shape="id100" draw:end-glue-point="2" svg:d="M23648 126752v-760" svg:viewBox="0 0 1 761">
          <text:p/>
        </draw:connector>
        <draw:connector draw:style-name="gr1" draw:text-style-name="P1" draw:layer="layout" draw:type="curve" svg:x1="23.648cm" svg:y1="123.452cm" svg:x2="23.648cm" svg:y2="122.892cm" draw:start-shape="id100" draw:start-glue-point="0" draw:end-shape="id101" draw:end-glue-point="2" svg:d="M23648 123452v-560" svg:viewBox="0 0 1 561">
          <text:p/>
        </draw:connector>
        <draw:connector draw:style-name="gr1" draw:text-style-name="P1" draw:layer="layout" draw:type="curve" svg:x1="23.648cm" svg:y1="120.352cm" svg:x2="23.648cm" svg:y2="119.892cm" draw:start-shape="id101" draw:start-glue-point="0" draw:end-shape="id82" draw:end-glue-point="2" svg:d="M23648 120352v-460" svg:viewBox="0 0 1 46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Gabriela" svg:font-family="Gabriela" style:font-adornments="Regular" style:font-pitch="variable"/>
    <style:font-face style:name="Gabriela1" svg:font-family="Gabrie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25cm" fo:padding-bottom="0.025cm" fo:padding-left="0.025cm" fo:padding-right="0.0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Gabriela" fo:font-family="Gabriela" style:font-style-name="Regular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Gabriela" fo:font-family="Gabriela" style:font-style-name="Regular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Gabriela" fo:font-family="Gabriela" style:font-style-name="Regular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1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0.762cm" fo:margin-bottom="0.762cm" fo:margin-left="0.762cm" fo:margin-right="0.762cm" fo:page-width="88.9cm" fo:page-height="139.7cm" style:print-orientation="portrait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3T15:36:57.051981200</meta:creation-date>
    <meta:editing-cycles>406</meta:editing-cycles>
    <meta:editing-duration>PT13H34M29S</meta:editing-duration>
    <dc:title>1 Chronicles 3</dc:title>
    <dc:date>2026-07-11T12:32:00.875127869</dc:date>
    <meta:generator>LibreOffice/26.2.4.2$Linux_X86_64 LibreOffice_project/64a984c51f4702dbd3710b13428c673a2f1292e7</meta:generator>
    <meta:document-statistic meta:object-count="236"/>
  </office:meta>
</office:document-meta>
</file>