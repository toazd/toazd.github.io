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28cm" svg:stroke-color="#000000" draw:marker-start-width="0.242cm" draw:marker-end-width="0.242cm" draw:fill="none" loext:fill-use-slide-background="false" draw:textarea-horizontal-align="justify" draw:textarea-vertical-align="top" draw:auto-grow-height="false" fo:min-height="16.115cm" fo:min-width="17.681cm" fo:padding-top="0.139cm" fo:padding-bottom="0.139cm" fo:padding-left="0.264cm" fo:padding-right="0.264cm" style:writing-mode="lr-tb" loext:decorative="false"/>
      <style:paragraph-properties style:writing-mode="lr-tb"/>
    </style:style>
    <style:style style:name="gr2" style:family="graphic">
      <style:graphic-properties style:writing-mode="lr-tb" loext:decorative="false"/>
    </style:style>
    <style:style style:name="gr3" style:family="graphic" style:parent-style-name="standard">
      <style:graphic-properties draw:textarea-horizontal-align="justify" draw:textarea-vertical-align="middle" draw:auto-grow-height="false" fo:min-height="1.184cm" fo:min-width="1.994cm" style:writing-mode="lr-tb" loext:decorative="false"/>
      <style:paragraph-properties style:writing-mode="lr-tb"/>
    </style:style>
    <style:style style:name="gr4" style:family="graphic" style:parent-style-name="standard">
      <style:graphic-properties draw:fill-color="#ffd7d7" draw:textarea-horizontal-align="justify" draw:textarea-vertical-align="middle" draw:auto-grow-height="false" fo:min-height="1.184cm" fo:min-width="1.977cm" style:writing-mode="lr-tb" loext:decorative="false"/>
      <style:paragraph-properties style:writing-mode="lr-tb"/>
    </style:style>
    <style:style style:name="gr5" style:family="graphic" style:parent-style-name="standard">
      <style:graphic-properties draw:fill-color="#ffd7d7" draw:textarea-horizontal-align="justify" draw:textarea-vertical-align="middle" draw:auto-grow-height="false" fo:min-height="1.184cm" fo:min-width="2.164cm" style:writing-mode="lr-tb" loext:decorative="false"/>
      <style:paragraph-properties style:writing-mode="lr-tb"/>
    </style:style>
    <style:style style:name="gr6" style:family="graphic" style:parent-style-name="standard">
      <style:graphic-properties draw:fill-color="#b2b2b2" draw:textarea-horizontal-align="justify" draw:textarea-vertical-align="middle" draw:auto-grow-height="false" fo:min-height="0.897cm" fo:min-width="2.233cm" style:writing-mode="lr-tb" loext:decorative="false"/>
      <style:paragraph-properties style:writing-mode="lr-tb"/>
    </style:style>
    <style:style style:name="gr7" style:family="graphic" style:parent-style-name="standard">
      <style:graphic-properties draw:textarea-horizontal-align="justify" draw:textarea-vertical-align="middle" draw:auto-grow-height="false" fo:min-height="1.071cm" fo:min-width="2.006cm" style:writing-mode="lr-tb" loext:decorative="false"/>
      <style:paragraph-properties style:writing-mode="lr-tb"/>
    </style:style>
    <style:style style:name="gr8" style:family="graphic" style:parent-style-name="standard">
      <style:graphic-properties draw:textarea-horizontal-align="justify" draw:textarea-vertical-align="middle" draw:auto-grow-height="false" fo:min-height="0.685cm" fo:min-width="1.622cm" style:writing-mode="lr-tb" loext:decorative="false"/>
      <style:paragraph-properties style:writing-mode="lr-tb"/>
    </style:style>
    <style:style style:name="gr9" style:family="graphic" style:parent-style-name="standard" style:list-style-name="L1">
      <style:graphic-properties draw:textarea-horizontal-align="justify" draw:textarea-vertical-align="middle" draw:auto-grow-height="false" fo:min-height="3.249cm" fo:min-width="1.968cm" style:writing-mode="lr-tb" loext:decorative="false"/>
      <style:paragraph-properties style:writing-mode="lr-tb"/>
    </style:style>
    <style:style style:name="gr10" style:family="graphic" style:parent-style-name="objectwithoutfill">
      <style:graphic-properties svg:stroke-width="0.035cm" svg:stroke-color="#ff0000" draw:marker-start-width="0.252cm" draw:marker-end-width="0.252cm" draw:fill="none" draw:textarea-vertical-align="middle" fo:padding-top="0.142cm" fo:padding-bottom="0.142cm" fo:padding-left="0.267cm" fo:padding-right="0.267cm" loext:decorative="false"/>
    </style:style>
    <style:style style:name="P1" style:family="paragraph">
      <style:paragraph-properties fo:text-align="left" loext:tab-stop-distance="0cm">
        <style:tab-stops>
          <style:tab-stop style:position="3.545cm"/>
        </style:tab-stops>
      </style:paragraph-properties>
      <style:text-properties fo:font-size="12pt" style:font-size-asian="12pt" style:font-size-complex="12pt"/>
    </style:style>
    <style:style style:name="P2" style:family="paragraph">
      <loext:graphic-properties draw:fill="none"/>
      <style:paragraph-properties fo:text-align="left" loext:tab-stop-distance="0cm" style:writing-mode="lr-tb">
        <style:tab-stops>
          <style:tab-stop style:position="3.545cm"/>
        </style:tab-stops>
      </style:paragraph-properties>
      <style:text-properties fo:font-size="12pt" style:font-size-asian="12pt" style:font-size-complex="12pt"/>
    </style:style>
    <style:style style:name="P3" style:family="paragraph">
      <style:paragraph-properties fo:text-align="center"/>
      <style:text-properties fo:font-size="12pt"/>
    </style:style>
    <style:style style:name="P4" style:family="paragraph">
      <style:paragraph-properties fo:text-align="center" style:writing-mode="lr-tb"/>
      <style:text-properties fo:font-size="12pt"/>
    </style:style>
    <style:style style:name="P5" style:family="paragraph">
      <loext:graphic-properties draw:fill-color="#ffd7d7"/>
      <style:paragraph-properties fo:text-align="center" style:writing-mode="lr-tb"/>
      <style:text-properties fo:font-size="12pt"/>
    </style:style>
    <style:style style:name="P6" style:family="paragraph">
      <loext:graphic-properties draw:fill-color="#b2b2b2"/>
      <style:paragraph-properties fo:text-align="center" style:writing-mode="lr-tb"/>
      <style:text-properties fo:font-size="12pt"/>
    </style:style>
    <style:style style:name="P7" style:family="paragraph">
      <style:paragraph-properties fo:margin-left="0cm" fo:margin-right="0cm" fo:margin-top="0cm" fo:margin-bottom="0cm" fo:line-height="100%" fo:text-align="center" fo:text-indent="0cm"/>
      <style:text-properties fo:font-size="12pt" style:font-size-asian="12pt" style:font-size-complex="12pt"/>
    </style:style>
    <style:style style:name="P8"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9" style:family="paragraph">
      <loext:graphic-properties draw:fill="none"/>
      <style:paragraph-properties fo:text-align="center"/>
    </style:style>
    <style:style style:name="T1" style:family="text">
      <style:text-properties fo:color="#127622" loext:opacity="100%" fo:font-size="12pt" style:font-size-asian="12pt" style:font-size-complex="12pt"/>
    </style:style>
    <style:style style:name="T2" style:family="text">
      <style:text-properties fo:font-size="12pt" style:font-size-asian="12pt" style:font-size-complex="12pt"/>
    </style:style>
    <style:style style:name="T3" style:family="text">
      <style:text-properties fo:color="#127622" loext:opacity="100%" fo:font-size="12pt" fo:background-color="transparent" style:font-size-asian="12pt" style:font-size-complex="12pt"/>
    </style:style>
    <style:style style:name="T4" style:family="text">
      <style:text-properties style:use-window-font-color="true" loext:opacity="0%" fo:font-size="12pt" style:font-size-asian="12pt" style:font-size-complex="12pt"/>
    </style:style>
    <style:style style:name="T5" style:family="text">
      <style:text-properties style:use-window-font-color="true" loext:opacity="0%" fo:font-size="12pt" fo:font-style="italic" style:font-size-asian="12pt" style:font-style-asian="italic" style:font-size-complex="12pt" style:font-style-complex="italic"/>
    </style:style>
    <style:style style:name="T6" style:family="text">
      <style:text-properties fo:font-size="12pt"/>
    </style:style>
    <style:style style:name="T7" style:family="text">
      <style:text-properties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18.209cm" svg:height="16.393cm" svg:x="1.691cm" svg:y="1.117cm">
          <text:list text:style-name="L1">
            <text:list-item>
              <text:p text:style-name="P1"><text:span text:style-name="T1">2Sa 17:25</text:span><text:span text:style-name="T2"> – Amasa son of (Ithra an Israelite + Abigail) becomes captain of Absalom’s host</text:span></text:p>
            </text:list-item>
            <text:list-item>
              <text:p text:style-name="P1"><text:span text:style-name="T1">2Sa 19:13</text:span><text:span text:style-name="T2"> – David calls Amasa my bone and my flesh, and swears that he will make Amasa captain of the host instead of Joab</text:span></text:p>
            </text:list-item>
            <text:list-item>
              <text:p text:style-name="P1"><text:span text:style-name="T1">2Sa 20:8-10</text:span><text:span text:style-name="T2"> – Joab murders Amasa</text:span></text:p>
            </text:list-item>
            <text:list-item>
              <text:p text:style-name="P1"><text:span text:style-name="T3">1Ki 2:5</text:span><text:span text:style-name="T2"> – David, speaking to his son Solomon, reminds him how Joab murdered Abner and Amasa. He refers to Amasa as the son of Jether</text:span></text:p>
            </text:list-item>
            <text:list-item>
              <text:p text:style-name="P1"><text:span text:style-name="T1">1Ki 2:32</text:span><text:span text:style-name="T2"> – Solomon refers to one of the men that Joab murdered as Amasa the son of Jether</text:span></text:p>
            </text:list-item>
            <text:list-item>
              <text:p text:style-name="P1"><text:span text:style-name="T1">1Ch 2:17</text:span><text:span text:style-name="T2"> – Abigail bare Amasa: and the father of Amasa was Jether the Ishmeelite</text:span></text:p>
            </text:list-item>
          </text:list>
          <text:p text:style-name="P1"><text:span text:style-name="T2"/></text:p>
          <text:list text:continue-numbering="true" text:style-name="L1">
            <text:list-item>
              <text:p text:style-name="P1"><text:span text:style-name="T2">Amasa’s father is known by two names: Ithra and Jether.</text:span></text:p>
              <text:list>
                <text:list-item>
                  <text:p text:style-name="P1"><text:span text:style-name="T2">He is also referred to as both an Israelite and an Ishmeelite.</text:span></text:p>
                </text:list-item>
                <text:list-item>
                  <text:p text:style-name="P1"><text:span text:style-name="T2">In the order given in the Bible he is first an Israelite and then an Ishmeelite.</text:span></text:p>
                  <text:list>
                    <text:list-item>
                      <text:p text:style-name="P1"><text:span text:style-name="T2">An Ishmeelite/Ishmaelite (H3459) is a descendent of Ishmael (Isaac’s brother).</text:span></text:p>
                    </text:list-item>
                    <text:list-item>
                      <text:p text:style-name="P1"><text:span text:style-name="T2">In order for him to be both an Israelite and an Ishmeelite, either he was first a descendant of Israel/Jacob and then a man named Ishmeel/Ishmael that came after</text:span></text:p>
                    </text:list-item>
                    <text:list-item>
                      <text:p text:style-name="P1"><text:span text:style-name="T2">Or he was a descendant of Ishmael (Isaac’s brother), and one of his male ancestors married into an Israelite tribe.</text:span></text:p>
                      <text:list>
                        <text:list-item>
                          <text:p text:style-name="P1"><text:span text:style-name="T2">ie. Ruth was a Moabitess who married into the tribe of Judah (Mahlon </text:span><text:span text:style-name="T1">Rth 4:10</text:span><text:span text:style-name="T2">), making her both a Moabitess and an Israelite.</text:span></text:p>
                        </text:list-item>
                      </text:list>
                    </text:list-item>
                  </text:list>
                </text:list-item>
              </text:list>
            </text:list-item>
            <text:list-item>
              <text:p text:style-name="P1"><text:span text:style-name="T2">Since David calls Amasa his bone and his flesh, Amasa’s father could have been from the tribe of Judah but he also could have called him that because he was David’s sister’s son (his nephew). We can only prove the latter with scripture.</text:span></text:p>
            </text:list-item>
          </text:list>
          <text:p text:style-name="P1"><text:span text:style-name="T2"/></text:p>
          <text:list text:continue-numbering="true" text:style-name="L1">
            <text:list-item>
              <text:p text:style-name="P1"><text:span text:style-name="T2">Regarding Nahash (</text:span><text:span text:style-name="T1">2Sa 17:25</text:span><text:span text:style-name="T2">), his or her identity or gender cannot be precisely verified in scripture.</text:span></text:p>
              <text:list>
                <text:list-item>
                  <text:p text:style-name="P1"><text:span text:style-name="T2">The only other mentions of a Nahash are:</text:span></text:p>
                  <text:list>
                    <text:list-item>
                      <text:p text:style-name="P1"><text:span text:style-name="T2">An Ammonite king: </text:span><text:span text:style-name="T1">1Sa 11:1,2, 12:12</text:span><text:span text:style-name="T2">, </text:span><text:span text:style-name="T1">2Sa 10:2 </text:span><text:span text:style-name="T4">(→</text:span><text:span text:style-name="T1">2Sa 17:27</text:span><text:span text:style-name="T4">)</text:span><text:span text:style-name="T1">, 17:27</text:span><text:span text:style-name="T2">, </text:span><text:span text:style-name="T1">1Ch 19:1,2</text:span></text:p>
                    </text:list-item>
                    <text:list-item>
                      <text:p text:style-name="P1"><text:span text:style-name="T2">The city of Nahash: </text:span><text:span text:style-name="T1">1Ch 4:12</text:span></text:p>
                    </text:list-item>
                  </text:list>
                </text:list-item>
                <text:list-item>
                  <text:p text:style-name="P1"><text:span text:style-name="T4">A few </text:span><text:span text:style-name="T5">possibilities</text:span><text:span text:style-name="T4"> exist that maintain what we do know from scripture (but cannot be proven with scripture):</text:span></text:p>
                  <text:list>
                    <text:list-item>
                      <text:p text:style-name="P1"><text:span text:style-name="T4">Nahash could have been one of Jesse’s wife’s former husband.</text:span></text:p>
                    </text:list-item>
                    <text:list-item>
                      <text:p text:style-name="P1"><text:span text:style-name="T4">Nahash was the name of Jesse’s wife.</text:span></text:p>
                    </text:list-item>
                    <text:list-item>
                      <text:p text:style-name="P1"><text:span text:style-name="T4">Nahash is another name for Jesse.</text:span></text:p>
                    </text:list-item>
                  </text:list>
                </text:list-item>
              </text:list>
            </text:list-item>
          </text:list>
          <draw:enhanced-geometry svg:viewBox="0 0 21600 21600" draw:mirror-horizontal="false" draw:mirror-vertical="false" draw:type="rectangle" draw:enhanced-path="M 0 0 L 21600 0 21600 21600 0 21600 0 0 Z N"/>
        </draw:custom-shape>
        <draw:g draw:style-name="gr2">
          <draw:custom-shape draw:style-name="gr3" draw:text-style-name="P4" xml:id="id1" draw:id="id1" draw:layer="layout" svg:width="2.648cm" svg:height="1.588cm" svg:x="15.125cm" svg:y="21.555cm">
            <text:p text:style-name="P3"><text:span text:style-name="T6">David</text:span></text:p>
            <text:p text:style-name="P3"><text:span text:style-name="T7">1Ch 2:12-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5" xml:id="id3" draw:id="id3" draw:layer="layout" svg:width="2.631cm" svg:height="1.588cm" svg:x="8.365cm" svg:y="21.555cm">
            <text:p text:style-name="P3"><text:span text:style-name="T6">Abiga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5" xml:id="id2" draw:id="id2" draw:layer="layout" svg:width="2.818cm" svg:height="1.588cm" svg:x="11.671cm" svg:y="21.555cm">
            <text:p text:style-name="P3"><text:span text:style-name="T6">Zeruia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6" xml:id="id4" draw:id="id4" draw:layer="layout" svg:width="2.857cm" svg:height="1.271cm" svg:x="8.252cm" svg:y="19.015cm">
            <text:p text:style-name="P3"><text:span text:style-name="T6">Nahash</text:span></text:p>
            <text:p text:style-name="P3"><text:span text:style-name="T7">2Sa 17: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4" xml:id="id8" draw:id="id8" draw:layer="layout" svg:width="2.648cm" svg:height="1.463cm" svg:x="15.125cm" svg:y="18.78cm">
            <text:p text:style-name="P3"><text:span text:style-name="T6">Jesse</text:span></text:p>
            <text:p text:style-name="P3"><text:span text:style-name="T7">Rth 4:17,22</text:span></text:p>
            <text:p text:style-name="P3"><text:span text:style-name="T7">1Sa 17: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4" xml:id="id7" draw:id="id7" draw:layer="layout" svg:width="2.222cm" svg:height="1.035cm" svg:x="6.343cm" svg:y="24.095cm">
            <text:p text:style-name="P3"><text:span text:style-name="T6">Amas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8" xml:id="id5" draw:id="id5" draw:layer="layout" svg:width="2.734cm" svg:height="3.765cm" svg:x="3.817cm" svg:y="19.38cm">
            <text:p text:style-name="P7"><text:span text:style-name="T2">Ithra an Israelite</text:span></text:p>
            <text:p text:style-name="P7"><text:span text:style-name="T7">2Sa 17:25</text:span></text:p>
            <text:p text:style-name="P7"><text:span text:style-name="T2">- - -</text:span></text:p>
            <text:p text:style-name="P7"><text:span text:style-name="T2">Jether the Ishmeelite</text:span></text:p>
            <text:p text:style-name="P7"><text:span text:style-name="T7">1Ch 2:17</text:span></text:p>
            <text:p text:style-name="P7"><text:span text:style-name="T7">1Ki 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0" draw:text-style-name="P9" draw:layer="layout" draw:type="curve" svg:x1="15.125cm" svg:y1="22.349cm" svg:x2="14.489cm" svg:y2="22.349cm" draw:start-shape="id1" draw:start-glue-point="3" draw:end-shape="id2" draw:end-glue-point="1" svg:d="M15125 22349h-636" svg:viewBox="0 0 637 1">
            <text:p/>
          </draw:connector>
          <draw:connector draw:style-name="gr10" draw:text-style-name="P9" draw:layer="layout" draw:type="curve" svg:x1="11.671cm" svg:y1="22.349cm" svg:x2="10.996cm" svg:y2="22.349cm" draw:start-shape="id2" draw:start-glue-point="3" draw:end-shape="id3" draw:end-glue-point="1" svg:d="M11671 22349h-675" svg:viewBox="0 0 676 1">
            <text:p/>
          </draw:connector>
          <draw:connector draw:style-name="gr10" draw:text-style-name="P9" draw:layer="layout" draw:type="curve" svg:x1="9.68cm" svg:y1="20.286cm" svg:x2="9.68cm" svg:y2="21.555cm" draw:start-shape="id4" draw:start-glue-point="2" draw:end-shape="id3" draw:end-glue-point="0" svg:d="M9680 20286v1269" svg:viewBox="0 0 1 1270">
            <text:p/>
          </draw:connector>
          <draw:connector draw:style-name="gr10" draw:text-style-name="P9" xml:id="id6" draw:id="id6" draw:layer="layout" draw:type="curve" svg:x1="6.551cm" svg:y1="21.262cm" svg:x2="8.365cm" svg:y2="22.349cm" draw:start-shape="id5" draw:start-glue-point="1" draw:end-shape="id3" draw:end-glue-point="3" svg:d="M6551 21262c1360 0 454 1087 1814 1087" svg:viewBox="0 0 1815 1088">
            <text:p/>
          </draw:connector>
          <draw:connector draw:style-name="gr10" draw:text-style-name="P9" draw:layer="layout" draw:type="curve" svg:x1="7.458cm" svg:y1="21.805cm" svg:x2="7.454cm" svg:y2="24.095cm" draw:start-shape="id6" draw:start-glue-point="0" draw:end-shape="id7" draw:end-glue-point="0" svg:d="M7458 21805c0 2137-4 993-4 2290" svg:viewBox="0 0 5 2291">
            <text:p/>
          </draw:connector>
          <draw:connector draw:style-name="gr10" draw:text-style-name="P9" draw:layer="layout" draw:type="curve" svg:x1="16.449cm" svg:y1="20.243cm" svg:x2="16.449cm" svg:y2="21.555cm" draw:start-shape="id8" draw:start-glue-point="2" draw:end-shape="id1" draw:end-glue-point="0" svg:d="M16449 20243v1312" svg:viewBox="0 0 1 1313">
            <text:p/>
          </draw:connector>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1-29T07:30:44.577000000</meta:creation-date>
    <dc:date>2026-07-11T12:31:55.055599334</dc:date>
    <meta:editing-duration>PT7H2M17S</meta:editing-duration>
    <meta:editing-cycles>101</meta:editing-cycles>
    <meta:generator>LibreOffice/26.2.4.2$Linux_X86_64 LibreOffice_project/64a984c51f4702dbd3710b13428c673a2f1292e7</meta:generator>
    <meta:document-statistic meta:object-count="15"/>
  </office:meta>
</office:document-meta>
</file>