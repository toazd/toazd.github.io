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top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draw:marker-start="" svg:stroke-linecap="butt" draw:fill="none" draw:textarea-horizontal-align="righ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fill="none" draw:textarea-horizontal-align="left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3.492cm" fo:min-width="2.48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2.042cm" fo:min-width="2.55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bottom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4.508cm" fo:min-width="2.48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.21cm" fo:min-width="3.04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draw:marker-start="Concave_20_short" draw:marker-end="" draw:fill="none" draw:textarea-horizontal-align="left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color="#000000" draw:fill="none" draw:textarea-horizontal-align="right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solid" draw:stroke-dash="Dot" svg:stroke-color="#ff0000" draw:textarea-horizontal-align="justify" draw:textarea-vertical-align="top" draw:auto-grow-height="false" fo:min-height="3.492cm" fo:min-width="2.4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color="#000000" draw:fill="none" draw:textarea-vertical-align="middle" loext:decorative="false"/>
    </style:style>
    <style:style style:name="gr15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t" svg:stroke-color="#000000" draw:marker-start="Concave_20_short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dash" draw:stroke-dash="Dot" svg:stroke-color="#000000" draw:marker-start="" draw:marker-start-width="0.3cm" draw:marker-end="" draw:marker-end-width="0.3cm" svg:stroke-linecap="butt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12.636cm" fo:min-width="2.48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6.794cm" fo:min-width="2.4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1.814cm" fo:min-width="2.5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Dot" svg:stroke-color="#000000" draw:fill="none" draw:textarea-vertical-align="middle" loext:decorative="false"/>
      <style:paragraph-properties style:writing-mode="lr-tb"/>
    </style:style>
    <style:style style:name="P1" style:family="paragraph">
      <style:paragraph-properties fo:text-align="end"/>
      <style:text-properties fo:font-size="6pt"/>
    </style:style>
    <style:style style:name="P2" style:family="paragraph">
      <loext:graphic-properties draw:fill="none"/>
      <style:paragraph-properties fo:text-align="end"/>
      <style:text-properties fo:color="#000000" loext:opacity="100%" style:font-name="Ubuntu" fo:font-size="6pt" style:font-size-asian="10pt" style:font-size-complex="10pt"/>
    </style:style>
    <style:style style:name="P3" style:family="paragraph">
      <style:paragraph-properties fo:text-align="start"/>
      <style:text-properties fo:font-size="6pt"/>
    </style:style>
    <style:style style:name="P4" style:family="paragraph">
      <style:paragraph-properties fo:text-align="center"/>
      <style:text-properties fo:color="#000000" loext:opacity="100%" style:font-name="Ubuntu"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000000" loext:opacity="100%" style:font-name="Ubuntu" fo:font-size="10pt" style:font-size-asian="10pt" style:font-size-complex="10pt"/>
    </style:style>
    <style:style style:name="P6" style:family="paragraph">
      <style:paragraph-properties fo:text-align="center"/>
      <style:text-properties fo:color="#000000" loext:opacity="100%" style:font-name="Ubuntu" fo:font-size="6pt" style:font-size-asian="8pt" style:font-size-complex="8pt"/>
    </style:style>
    <style:style style:name="P7" style:family="paragraph">
      <style:paragraph-properties fo:text-align="center" style:writing-mode="lr-tb"/>
      <style:text-properties fo:color="#000000" loext:opacity="100%" style:font-name="Ubuntu" fo:font-size="6pt" style:font-size-asian="8pt" style:font-size-complex="8pt"/>
    </style:style>
    <style:style style:name="P8" style:family="paragraph">
      <loext:graphic-properties draw:fill="none"/>
      <style:paragraph-properties fo:text-align="start"/>
      <style:text-properties fo:color="#000000" loext:opacity="100%" style:font-name="Ubuntu" fo:font-size="6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6pt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fo:font-size="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loext:opacity="100%" style:font-name="Ubuntu" fo:font-size="6pt" style:font-size-asian="10pt" style:font-size-complex="10pt"/>
    </style:style>
    <style:style style:name="P12" style:family="paragraph">
      <style:paragraph-properties fo:text-align="center"/>
      <style:text-properties fo:font-size="6pt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loext:opacity="100%" style:font-name="Ubuntu" fo:font-style="normal" style:text-underline-style="none" fo:font-weight="normal" style:font-size-asian="2pt" style:font-size-complex="2pt"/>
    </style:style>
    <style:style style:name="T2" style:family="text">
      <style:text-properties fo:color="#000000" loext:opacity="100%" style:font-name="Ubuntu" fo:font-style="normal" style:text-underline-style="none" fo:font-weight="normal" style:font-size-asian="10pt" style:font-size-complex="10pt"/>
    </style:style>
    <style:style style:name="T3" style:family="text">
      <style:text-properties fo:color="#000000" loext:opacity="100%" style:text-position="super 58%" style:font-name="Ubuntu" fo:font-style="normal" style:text-underline-style="none" fo:font-weight="normal" style:font-size-asian="10pt" style:font-size-complex="10pt"/>
    </style:style>
    <style:style style:name="T4" style:family="text">
      <style:text-properties fo:color="#000000" loext:opacity="100%" style:font-name="Ubuntu" fo:font-style="normal" style:text-underline-style="none" fo:font-weight="normal" style:font-size-asian="8pt" style:font-size-complex="8pt"/>
    </style:style>
    <style:style style:name="T5" style:family="text">
      <style:text-properties fo:color="#000000" loext:opacity="100%" style:font-name="Ubuntu" fo:font-style="normal" style:text-underline-style="solid" style:text-underline-width="auto" style:text-underline-color="font-color" fo:font-weight="normal" style:font-size-asian="10pt" style:font-size-complex="10pt"/>
    </style:style>
    <style:style style:name="T6" style:family="text">
      <style:text-properties fo:color="#000000" loext:opacity="100%" fo:font-style="normal" style:text-underline-style="none" fo:font-weight="normal" style:font-size-asian="6pt" style:font-size-complex="6pt"/>
    </style:style>
    <style:style style:name="T7" style:family="text">
      <style:text-properties fo:color="#000000" loext:opacity="100%" style:font-name="Ubuntu" fo:font-style="normal" style:text-underline-style="none" fo:font-weight="normal" style:font-size-asian="12pt" style:font-size-complex="12pt"/>
    </style:style>
    <style:style style:name="T8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2" draw:layer="layout" svg:x1="12.5cm" svg:y1="14.463cm" svg:x2="17.215cm" svg:y2="14.463cm">
            <text:p text:style-name="P1"><text:span text:style-name="T1"/></text:p>
            <text:p text:style-name="P1"><text:span text:style-name="T2">39</text:span><text:span text:style-name="T3">th</text:span><text:span text:style-name="T2"> year <text:s text:c="4"/></text:span></text:p>
            <text:p text:style-name="P1"><text:span text:style-name="T2">2Ki 15:13,17 <text:s text:c="4"/></text:span></text:p>
          </draw:line>
          <draw:line draw:style-name="gr3" draw:text-style-name="P2" draw:layer="layout" svg:x1="19.792cm" svg:y1="4.547cm" svg:x2="21.519cm" svg:y2="4.547cm">
            <text:p text:style-name="P1"><text:span text:style-name="T2"/></text:p>
            <text:p text:style-name="P1"><text:span text:style-name="T2">Age: 16</text:span></text:p>
          </draw:line>
          <draw:line draw:style-name="gr4" draw:text-style-name="P2" draw:layer="layout" svg:x1="16.059cm" svg:y1="22.337cm" svg:x2="17.888cm" svg:y2="22.337cm">
            <text:p text:style-name="P1"><text:span text:style-name="T2"/></text:p>
            <text:p text:style-name="P3"><text:span text:style-name="T2">Age: 41</text:span></text:p>
          </draw:line>
          <draw:line draw:style-name="gr4" draw:text-style-name="P2" draw:layer="layout" svg:x1="17.712cm" svg:y1="26.147cm" svg:x2="19.261cm" svg:y2="26.147cm">
            <text:p text:style-name="P1"><text:span text:style-name="T2"/></text:p>
            <text:p text:style-name="P3"><text:span text:style-name="T2">Age: 36</text:span></text:p>
          </draw:line>
          <draw:custom-shape draw:style-name="gr5" draw:text-style-name="P5" draw:layer="layout" svg:width="3.302cm" svg:height="4.064cm" svg:x="17.22cm" svg:y="18.273cm">
            <text:p text:style-name="P4"><text:span text:style-name="T2">Jotham/Joatham</text:span></text:p>
            <text:p text:style-name="P4"><text:span text:style-name="T2">16yrs</text:span></text:p>
            <text:p text:style-name="P4"><text:span text:style-name="T2">2Ki 15:5,32,33</text:span></text:p>
            <text:p text:style-name="P4"><text:span text:style-name="T2">2Ch 26:23, 27:1,8</text:span></text:p>
            <text:p text:style-name="P4"><text:span text:style-name="T2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6" draw:text-style-name="P5" draw:layer="layout" svg:width="3.302cm" svg:height="2.54cm" svg:x="9.814cm" svg:y="14.463cm">
            <text:p text:style-name="P4"><text:span text:style-name="T2">Menahem</text:span></text:p>
            <text:p text:style-name="P4"><text:span text:style-name="T2">son of Gadi</text:span></text:p>
            <text:p text:style-name="P4"><text:span text:style-name="T2">10yrs</text:span></text:p>
            <text:p text:style-name="P4"><text:span text:style-name="T2">2Ki 15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7" draw:text-style-name="P2" draw:layer="layout" svg:x1="10.683cm" svg:y1="17.267cm" svg:x2="17.215cm" svg:y2="17.267cm">
            <text:p text:style-name="P1"><text:span text:style-name="T2">50</text:span><text:span text:style-name="T3">th</text:span><text:span text:style-name="T2"> year <text:s text:c="4"/></text:span></text:p>
            <text:p text:style-name="P1"><text:span text:style-name="T2">2Ki 15:23 <text:s text:c="4"/></text:span></text:p>
            <text:p text:style-name="P1"><text:span text:style-name="T1"/></text:p>
          </draw:line>
          <draw:custom-shape draw:style-name="gr8" draw:text-style-name="P5" draw:layer="layout" svg:width="3.302cm" svg:height="5.08cm" svg:x="9.814cm" svg:y="17.765cm">
            <text:p text:style-name="P4"><text:span text:style-name="T2">Pekah</text:span></text:p>
            <text:p text:style-name="P4"><text:span text:style-name="T2">son of Remaliah</text:span></text:p>
            <text:p text:style-name="P4"><text:span text:style-name="T2">20yrs</text:span></text:p>
            <text:p text:style-name="P4"><text:span text:style-name="T2">2Ki 15:25,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9" draw:text-style-name="P7" draw:layer="layout" svg:width="3.588cm" svg:height="0.508cm" svg:x="9.529cm" svg:y="17.257cm">
            <text:p text:style-name="P6"><text:span text:style-name="T4">Pekahiah 2yrs 2Ki 15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10" draw:text-style-name="P2" draw:layer="layout" svg:x1="10.683cm" svg:y1="23.358cm" svg:x2="17.215cm" svg:y2="23.358cm">
            <text:p text:style-name="P1"><text:span text:style-name="T2">20</text:span><text:span text:style-name="T3">th</text:span><text:span text:style-name="T2"> year of Jotham (age: 45) <text:s text:c="4"/></text:span></text:p>
            <text:p text:style-name="P1"><text:span text:style-name="T2">2Ki 15:30 <text:s text:c="4"/></text:span></text:p>
          </draw:line>
          <draw:line draw:style-name="gr11" draw:text-style-name="P8" draw:layer="layout" svg:x1="13.117cm" svg:y1="18.273cm" svg:x2="17.905cm" svg:y2="18.27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6"/></text:span><text:span text:style-name="T2">2</text:span><text:span text:style-name="T3">nd</text:span><text:span text:style-name="T2"> year 2Ki 15:32</text:span></text:p>
          </draw:line>
          <draw:line draw:style-name="gr12" draw:text-style-name="P2" draw:layer="layout" svg:x1="19.788cm" svg:y1="18.273cm" svg:x2="21.363cm" svg:y2="18.273cm">
            <text:p text:style-name="P1"><text:span text:style-name="T2"/></text:p>
            <text:p text:style-name="P1"><text:span text:style-name="T2">Age: 25</text:span></text:p>
          </draw:line>
          <draw:custom-shape draw:style-name="gr13" draw:text-style-name="P5" draw:layer="layout" svg:width="3.302cm" svg:height="4.064cm" svg:x="18.721cm" svg:y="22.083cm">
            <draw:glue-point draw:id="4" svg:x="5cm" svg:y="-2.29cm"/>
            <text:p text:style-name="P4"><text:span text:style-name="T2">Ahaz/Achaz</text:span></text:p>
            <text:p text:style-name="P4"><text:span text:style-name="T2">16yrs</text:span></text:p>
            <text:p text:style-name="P4"><text:span text:style-name="T2">2Ki 16:2</text:span></text:p>
            <text:p text:style-name="P4"><text:span text:style-name="T2">2Ch 27:9, 28:1 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14" draw:text-style-name="P9" draw:layer="layout" svg:x1="17.22cm" svg:y1="23.353cm" svg:x2="17.22cm" svg:y2="18.273cm">
            <text:p/>
          </draw:line>
          <draw:line draw:style-name="gr11" draw:text-style-name="P8" draw:layer="layout" svg:x1="13.118cm" svg:y1="22.083cm" svg:x2="19.392cm" svg:y2="22.08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4"/></text:span><text:span text:style-name="T2">17</text:span><text:span text:style-name="T3">th</text:span><text:span text:style-name="T2"> year 2Ki 16:1</text:span></text:p>
          </draw:line>
          <draw:line draw:style-name="gr12" draw:text-style-name="P2" draw:layer="layout" svg:x1="21.011cm" svg:y1="22.083cm" svg:x2="22.992cm" svg:y2="22.083cm">
            <text:p text:style-name="P1"><text:span text:style-name="T2">Age: 40 <text:s text:c="29"/></text:span></text:p>
            <text:p text:style-name="P1"><text:span text:style-name="T2">Age: 20</text:span></text:p>
          </draw:line>
          <draw:line draw:style-name="gr10" draw:text-style-name="P2" draw:layer="layout" svg:x1="17.225cm" svg:y1="23.358cm" svg:x2="18.724cm" svg:y2="23.358cm">
            <text:p text:style-name="P1"><text:span text:style-name="T2">5</text:span><text:span text:style-name="T3">th</text:span><text:span text:style-name="T2"> year <text:s text:c="2"/></text:span></text:p>
            <text:p text:style-name="P1"><text:span text:style-name="T2"/></text:p>
          </draw:line>
          <draw:line draw:style-name="gr15" draw:text-style-name="P2" draw:layer="layout" svg:x1="16.079cm" svg:y1="25.131cm" svg:x2="18.725cm" svg:y2="25.131cm">
            <text:p text:style-name="P1"><text:span text:style-name="T2">Began to reign in Samaria <text:s text:c="56"/></text:span></text:p>
            <text:p text:style-name="P1"><text:span text:style-name="T2">12</text:span><text:span text:style-name="T3">th</text:span><text:span text:style-name="T2"> year 2Ki 17:1</text:span></text:p>
          </draw:line>
          <draw:line draw:style-name="gr11" draw:text-style-name="P8" draw:layer="layout" svg:x1="13.119cm" svg:y1="24.115cm" svg:x2="24.137cm" svg:y2="24.11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4"/></text:span><text:span text:style-name="T2">3</text:span><text:span text:style-name="T3">rd</text:span><text:span text:style-name="T2"> year 2Ki 18:1</text:span></text:p>
          </draw:line>
          <draw:line draw:style-name="gr12" draw:text-style-name="P2" draw:layer="layout" svg:x1="24.109cm" svg:y1="24.113cm" svg:x2="25.887cm" svg:y2="24.113cm">
            <text:p text:style-name="P1"><text:span text:style-name="T2">Age: 28 <text:s text:c="58"/></text:span></text:p>
            <text:p text:style-name="P1"><text:span text:style-name="T2">Age: 25</text:span></text:p>
          </draw:line>
          <draw:line draw:style-name="gr10" draw:text-style-name="P11" draw:layer="layout" svg:x1="18.721cm" svg:y1="25.131cm" svg:x2="21.715cm" svg:y2="25.131cm">
            <text:p text:style-name="P10"><text:span text:style-name="T2">4</text:span><text:span text:style-name="T3">th</text:span><text:span text:style-name="T2"> year 2Ki 18:9 <text:s/></text:span></text:p>
            <text:p text:style-name="P1"><text:span text:style-name="T2"/></text:p>
          </draw:line>
          <draw:line draw:style-name="gr16" draw:text-style-name="P8" draw:layer="layout" svg:x1="13.12cm" svg:y1="25.131cm" svg:x2="16.066cm" svg:y2="25.131cm">
            <text:p text:style-name="P3"><text:span text:style-name="T2"/></text:p>
            <text:p text:style-name="P3"><text:span text:style-name="T2"><text:s text:c="4"/></text:span><text:span text:style-name="T2">7</text:span><text:span text:style-name="T3">th</text:span><text:span text:style-name="T2"> year 2Ki 18:9</text:span></text:p>
          </draw:line>
          <draw:line draw:style-name="gr10" draw:text-style-name="P2" draw:layer="layout" svg:x1="10.185cm" svg:y1="25.638cm" svg:x2="21.715cm" svg:y2="25.638cm">
            <text:p text:style-name="P1"><text:span text:style-name="T2"><text:s text:c="10"/></text:span><text:span text:style-name="T2">9</text:span><text:span text:style-name="T3">th</text:span><text:span text:style-name="T2"> year <text:s text:c="153"/></text:span></text:p>
            <text:p text:style-name="P1"><text:span text:style-name="T5">In</text:span><text:span text:style-name="T2"> the 6</text:span><text:span text:style-name="T3">th</text:span><text:span text:style-name="T2"> year 2Ki 18:10 <text:s text:c="2"/></text:span></text:p>
          </draw:line>
          <draw:line draw:style-name="gr12" draw:text-style-name="P2" draw:layer="layout" svg:x1="20.516cm" svg:y1="11.923cm" svg:x2="23.332cm" svg:y2="11.923cm">
            <text:p text:style-name="P1"><text:span text:style-name="T2">Jotham is born</text:span></text:p>
            <text:p text:style-name="P10"><text:span text:style-name="T2">29</text:span><text:span text:style-name="T3">th</text:span><text:span text:style-name="T2"> year, Uzziah age: 45</text:span></text:p>
          </draw:line>
          <draw:line draw:style-name="gr12" draw:text-style-name="P2" draw:layer="layout" svg:x1="19.788cm" svg:y1="17.755cm" svg:x2="21.363cm" svg:y2="17.755cm">
            <text:p text:style-name="P1"><text:span text:style-name="T2">Age: 68</text:span></text:p>
            <text:p text:style-name="P1"><text:span text:style-name="T2"/></text:p>
          </draw:line>
          <draw:line draw:style-name="gr12" draw:text-style-name="P2" draw:layer="layout" svg:x1="24.111cm" svg:y1="31.48cm" svg:x2="26.321cm" svg:y2="31.48cm">
            <text:p text:style-name="P1"><text:span text:style-name="T2">Age: 54</text:span></text:p>
            <text:p text:style-name="P1"><text:span text:style-name="T2"/></text:p>
          </draw:line>
          <draw:line draw:style-name="gr10" draw:text-style-name="P2" draw:layer="layout" svg:x1="17.225cm" svg:y1="24.115cm" svg:x2="18.724cm" svg:y2="24.115cm">
            <text:p text:style-name="P1"><text:span text:style-name="T2">8</text:span><text:span text:style-name="T3">th</text:span><text:span text:style-name="T2"> year <text:s text:c="2"/></text:span></text:p>
            <text:p text:style-name="P1"><text:span text:style-name="T2"/></text:p>
          </draw:line>
          <draw:line draw:style-name="gr12" draw:text-style-name="P2" draw:layer="layout" svg:x1="21.363cm" svg:y1="17.755cm" svg:x2="23.547cm" svg:y2="17.755cm">
            <text:p text:style-name="P1"><text:span text:style-name="T2">Hezekiah is born <text:s/></text:span></text:p>
            <text:p text:style-name="P1"><text:span text:style-name="T2">Ahaz age: 3 <text:s/></text:span></text:p>
          </draw:line>
          <draw:line draw:style-name="gr12" draw:text-style-name="P2" draw:layer="layout" svg:x1="20.502cm" svg:y1="17.009cm" svg:x2="23.956cm" svg:y2="17.009cm">
            <text:p text:style-name="P1"><text:span text:style-name="T2">Ahaz is born</text:span></text:p>
            <text:p text:style-name="P1"><text:span text:style-name="T2">Jotham age: 20</text:span></text:p>
          </draw:line>
          <draw:line draw:style-name="gr17" draw:text-style-name="P13" draw:layer="layout" svg:x1="11.472cm" svg:y1="22.86cm" svg:x2="11.472cm" svg:y2="23.345cm">
            <text:p text:style-name="P12"><text:span text:style-name="T6">2</text:span></text:p>
          </draw:line>
          <draw:line draw:style-name="gr17" draw:text-style-name="P13" draw:layer="layout" svg:x1="11.48cm" svg:y1="17.011cm" svg:x2="11.48cm" svg:y2="17.26cm">
            <text:p text:style-name="P12"><text:span text:style-name="T6">1</text:span></text:p>
          </draw:line>
          <draw:line draw:style-name="gr17" draw:text-style-name="P13" draw:layer="layout" svg:x1="18.786cm" svg:y1="17.788cm" svg:x2="18.786cm" svg:y2="18.273cm">
            <text:p text:style-name="P12"><text:span text:style-name="T6">2</text:span></text:p>
          </draw:line>
          <draw:line draw:style-name="gr10" draw:text-style-name="P2" draw:layer="layout" svg:x1="10.683cm" svg:y1="17.765cm" svg:x2="17.719cm" svg:y2="17.765cm">
            <text:p text:style-name="P1"><text:span text:style-name="T2"/></text:p>
            <text:p text:style-name="P1"><text:span text:style-name="T2">52</text:span><text:span text:style-name="T3">nd</text:span><text:span text:style-name="T2"> year 2Ki 15:27 <text:s text:c="15"/></text:span></text:p>
          </draw:line>
          <draw:custom-shape draw:style-name="gr18" draw:text-style-name="P5" draw:layer="layout" svg:width="3.302cm" svg:height="13.208cm" svg:x="17.214cm" svg:y="4.546cm">
            <draw:glue-point draw:id="4" svg:x="2.038cm" svg:y="-5cm"/>
            <text:p text:style-name="P4"><text:span text:style-name="T2">Azariah/Uzziah/Ozias</text:span></text:p>
            <text:p text:style-name="P4"><text:span text:style-name="T2">52yrs</text:span></text:p>
            <text:p text:style-name="P4"><text:span text:style-name="T2">2Ki 14:21</text:span><text:span text:style-name="T2"><text:line-break/></text:span><text:span text:style-name="T2">2Ki 15:1,2</text:span></text:p>
            <text:p text:style-name="P4"><text:span text:style-name="T2">2Ch 26:1,3</text:span></text:p>
            <text:p text:style-name="P4"><text:span text:style-name="T2">Mat 1:8,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19" draw:text-style-name="P5" draw:layer="layout" svg:width="3.302cm" svg:height="7.366cm" svg:x="21.678cm" svg:y="24.113cm">
            <text:p text:style-name="P4"><text:span text:style-name="T2">Hezekiah/Ezekias</text:span></text:p>
            <text:p text:style-name="P4"><text:span text:style-name="T2">29yrs</text:span></text:p>
            <text:p text:style-name="P4"><text:span text:style-name="T2">2Ki 16:20</text:span></text:p>
            <text:p text:style-name="P4"><text:span text:style-name="T2">2Ch 29:1</text:span></text:p>
            <text:p text:style-name="P4"><text:span text:style-name="T2">Mat 1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" draw:text-style-name="P5" draw:layer="layout" svg:width="3.302cm" svg:height="2.286cm" svg:x="9.821cm" svg:y="23.353cm">
            <text:p text:style-name="P4"><text:span text:style-name="T7">Hoshea</text:span></text:p>
            <text:p text:style-name="P4"><text:span text:style-name="T2">son of Elah</text:span></text:p>
            <text:p text:style-name="P4"><text:span text:style-name="T2">9yrs</text:span></text:p>
            <text:p text:style-name="P4"><text:span text:style-name="T2">2Ki 15:30, 17:1, 18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1" draw:text-style-name="P14" draw:layer="layout" svg:x1="23.503cm" svg:y1="17.755cm" svg:x2="23.503cm" svg:y2="24.113cm">
            <text:p text:style-name="P12"><text:span text:style-name="T8">25</text:span></text:p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6:42:43.901978742</meta:creation-date>
    <dc:date>2025-08-01T17:14:56.041289825</dc:date>
    <meta:editing-duration>PT20M44S</meta:editing-duration>
    <meta:editing-cycles>3</meta:editing-cycles>
    <meta:generator>LibreOffice/24.8.7.2$Linux_X86_64 LibreOffice_project/480$Build-2</meta:generator>
    <meta:document-statistic meta:object-count="38"/>
  </office:meta>
</office:document-meta>
</file>