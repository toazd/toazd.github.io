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Ubuntu_1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Tahoma_1.ttf" manifest:media-type="application/x-font-ttf"/>
  <manifest:file-entry manifest:full-path="Fonts/Font_Liberation_Serif_4.ttf" manifest:media-type="application/x-font-ttf"/>
  <manifest:file-entry manifest:full-path="Fonts/Font_Segoe_UI_1.ttf" manifest:media-type="application/x-font-tt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Ubuntu" svg:font-family="Ubuntu" style:font-family-generic="swiss" style:font-pitch="variable">
      <svg:font-face-src>
        <svg:font-face-uri xlink:href="Fonts/Font_Ubuntu_1.ttf" xlink:type="simple" loext:font-style="normal" loext:font-weight="normal">
          <svg:font-face-format svg:string="truetype"/>
        </svg:font-face-uri>
      </svg:font-face-src>
    </style:font-face>
    <style:font-face style:name="Ubuntu1" svg:font-family="Ubuntu" style:font-adornments="Regular" style:font-family-generic="swiss" style:font-pitch="variable">
      <svg:font-face-src>
        <svg:font-face-uri xlink:href="Fonts/Font_Ubuntu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8cm" fo:min-width="24.113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19.23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23.63cm" style:writing-mode="lr-tb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ot" svg:stroke-color="#ff0000" svg:stroke-linecap="butt" draw:fill="none" draw:textarea-vertical-align="middle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8.771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23.93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38cm" fo:min-width="22.23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38cm" fo:min-width="22.614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38cm" fo:min-width="22.487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38cm" fo:min-width="22.66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38cm" fo:min-width="23.122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Dot" svg:stroke-color="#ff0000" svg:stroke-linecap="butt" draw:fill="none" draw:textarea-vertical-align="middle" loext:decorative="false"/>
    </style:style>
    <style:style style:name="P1" style:family="paragraph">
      <style:paragraph-properties fo:text-align="center"/>
      <style:text-properties style:font-name="Ubuntu" fo:font-size="12pt"/>
    </style:style>
    <style:style style:name="P2" style:family="paragraph">
      <style:paragraph-properties fo:text-align="center" style:writing-mode="lr-tb"/>
      <style:text-properties style:font-name="Ubuntu"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style:paragraph-properties fo:text-align="end"/>
    </style:style>
    <style:style style:name="P6" style:family="paragraph">
      <loext:graphic-properties draw:fill="none"/>
      <style:paragraph-properties fo:text-align="end"/>
      <style:text-properties fo:font-size="12pt"/>
    </style:style>
    <style:style style:name="P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en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Ubuntu" fo:font-size="12pt"/>
    </style:style>
    <style:style style:name="T2" style:family="text">
      <style:text-properties fo:font-size="12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613cm" svg:height="1.588cm" svg:x="18.644cm" svg:y="21.95cm">
          <text:p text:style-name="P1"><text:span text:style-name="T1">Methuselah</text:span></text:p>
          <text:p text:style-name="P1"><text:span text:style-name="T1">969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3.394cm" svg:y1="23.539cm" svg:x2="23.394cm" svg:y2="24.809cm">
          <text:p text:style-name="P3"><text:span text:style-name="T2">187</text:span></text:p>
        </draw:line>
        <draw:custom-shape draw:style-name="gr3" draw:text-style-name="P2" draw:layer="layout" svg:width="19.736cm" svg:height="1.588cm" svg:x="23.394cm" svg:y="24.71cm">
          <text:p text:style-name="P1"><text:span text:style-name="T1">La</text:span><text:span text:style-name="T1">me</text:span><text:span text:style-name="T1">ch</text:span></text:p>
          <text:p text:style-name="P1"><text:span text:style-name="T1">777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8.017cm" svg:y1="26.305cm" svg:x2="28.017cm" svg:y2="27.575cm">
          <text:p text:style-name="P3"><text:span text:style-name="T2">182</text:span></text:p>
        </draw:line>
        <draw:custom-shape draw:style-name="gr4" draw:text-style-name="P2" draw:layer="layout" svg:width="24.13cm" svg:height="1.588cm" svg:x="28.017cm" svg:y="27.575cm">
          <text:p text:style-name="P1"><text:span text:style-name="T1">Noah</text:span></text:p>
          <text:p text:style-name="P1"><text:span text:style-name="T1">95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3.257cm" svg:y1="1.308cm" svg:x2="43.257cm" svg:y2="29.175cm">
          <text:p text:style-name="P5"><text:span text:style-name="T2">600</text:span></text:p>
        </draw:line>
        <draw:line draw:style-name="gr2" draw:text-style-name="P7" draw:layer="layout" svg:x1="43.13cm" svg:y1="24.71cm" svg:x2="43.257cm" svg:y2="24.71cm">
          <text:p text:style-name="P3"><text:span text:style-name="T3"/></text:p>
          <text:p text:style-name="P3"><text:span text:style-name="T3">5</text:span></text:p>
        </draw:line>
        <draw:custom-shape draw:style-name="gr6" draw:text-style-name="P2" draw:layer="layout" svg:width="9.271cm" svg:height="1.588cm" svg:x="16.993cm" svg:y="19.092cm">
          <text:p text:style-name="P1"><text:span text:style-name="T1">Enoch</text:span></text:p>
          <text:p text:style-name="P1"><text:span text:style-name="T1">365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8.644cm" svg:y1="20.68cm" svg:x2="18.644cm" svg:y2="21.95cm">
          <text:p text:style-name="P3"><text:span text:style-name="T2">65</text:span></text:p>
        </draw:line>
        <draw:custom-shape draw:style-name="gr7" draw:text-style-name="P2" draw:layer="layout" svg:width="24.435cm" svg:height="1.588cm" svg:x="12.878cm" svg:y="16.234cm">
          <text:p text:style-name="P1"><text:span text:style-name="T1">Jared</text:span></text:p>
          <text:p text:style-name="P1"><text:span text:style-name="T1">962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6.993cm" svg:y1="17.822cm" svg:x2="16.993cm" svg:y2="19.092cm">
          <text:p text:style-name="P3"><text:span text:style-name="T2">162</text:span></text:p>
        </draw:line>
        <draw:line draw:style-name="gr2" draw:text-style-name="P4" draw:layer="layout" svg:x1="12.878cm" svg:y1="14.964cm" svg:x2="12.878cm" svg:y2="16.234cm">
          <text:p text:style-name="P3"><text:span text:style-name="T2">65</text:span></text:p>
        </draw:line>
        <draw:custom-shape draw:style-name="gr8" draw:text-style-name="P2" draw:layer="layout" svg:width="22.733cm" svg:height="1.588cm" svg:x="11.227cm" svg:y="13.376cm">
          <text:p text:style-name="P1"><text:span text:style-name="T1">Mahalaleel</text:span></text:p>
          <text:p text:style-name="P1"><text:span text:style-name="T1">895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1.227cm" svg:y1="12.126cm" svg:x2="11.227cm" svg:y2="13.396cm">
          <text:p text:style-name="P3"><text:span text:style-name="T2">70</text:span></text:p>
        </draw:line>
        <draw:custom-shape draw:style-name="gr9" draw:text-style-name="P2" draw:layer="layout" svg:width="23.114cm" svg:height="1.588cm" svg:x="9.449cm" svg:y="10.538cm">
          <text:p text:style-name="P1"><text:span text:style-name="T1">Cai</text:span><text:span text:style-name="T1">nan</text:span></text:p>
          <text:p text:style-name="P1"><text:span text:style-name="T1">910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2.987cm" svg:height="1.588cm" svg:x="7.163cm" svg:y="7.68cm">
          <text:p text:style-name="P1"><text:span text:style-name="T1">Eno</text:span><text:span text:style-name="T1">s</text:span></text:p>
          <text:p text:style-name="P1"><text:span text:style-name="T1">905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9.449cm" svg:y1="9.268cm" svg:x2="9.449cm" svg:y2="10.538cm">
          <text:p text:style-name="P3"><text:span text:style-name="T2">90</text:span></text:p>
        </draw:line>
        <draw:custom-shape draw:style-name="gr11" draw:text-style-name="P2" draw:layer="layout" svg:width="23.165cm" svg:height="1.588cm" svg:x="4.496cm" svg:y="4.822cm">
          <text:p text:style-name="P1"><text:span text:style-name="T1">Seth</text:span></text:p>
          <text:p text:style-name="P1"><text:span text:style-name="T1">912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7.163cm" svg:y1="6.41cm" svg:x2="7.163cm" svg:y2="7.68cm">
          <text:p text:style-name="P3"><text:span text:style-name="T2">105</text:span></text:p>
        </draw:line>
        <draw:line draw:style-name="gr2" draw:text-style-name="P4" draw:layer="layout" svg:x1="4.496cm" svg:y1="3.552cm" svg:x2="4.496cm" svg:y2="4.822cm">
          <text:p text:style-name="P3"><text:span text:style-name="T2">130</text:span></text:p>
        </draw:line>
        <draw:custom-shape draw:style-name="gr12" draw:text-style-name="P2" draw:layer="layout" svg:width="23.622cm" svg:height="1.588cm" svg:x="1.194cm" svg:y="1.964cm">
          <text:p text:style-name="P1"><text:span text:style-name="T1">Adam</text:span></text:p>
          <text:p text:style-name="P1"><text:span text:style-name="T1">930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.194cm" svg:y1="1.306cm" svg:x2="43.257cm" svg:y2="1.309cm">
          <text:p text:style-name="P5">1656</text:p>
          <text:p text:style-name="P5"/>
        </draw:line>
        <draw:line draw:style-name="gr13" draw:text-style-name="P9" draw:layer="layout" svg:x1="1.194cm" svg:y1="1.306cm" svg:x2="1.194cm" svg:y2="3.552cm">
          <text:p/>
        </draw:line>
        <draw:line draw:style-name="gr2" draw:text-style-name="P9" draw:layer="layout" svg:x1="37.313cm" svg:y1="16.234cm" svg:x2="43.258cm" svg:y2="16.234cm">
          <text:p text:style-name="P3"/>
          <text:p text:style-name="P3">234</text:p>
        </draw:line>
        <draw:line draw:style-name="gr2" draw:text-style-name="P9" draw:layer="layout" svg:x1="33.96cm" svg:y1="13.385cm" svg:x2="43.257cm" svg:y2="13.385cm">
          <text:p text:style-name="P3"/>
          <text:p text:style-name="P3">366</text:p>
        </draw:line>
        <draw:line draw:style-name="gr2" draw:text-style-name="P9" draw:layer="layout" svg:x1="32.563cm" svg:y1="10.538cm" svg:x2="43.257cm" svg:y2="10.537cm">
          <text:p text:style-name="P3"/>
          <text:p text:style-name="P3">421</text:p>
        </draw:line>
        <draw:line draw:style-name="gr2" draw:text-style-name="P9" draw:layer="layout" svg:x1="30.15cm" svg:y1="7.68cm" svg:x2="43.259cm" svg:y2="7.679cm">
          <text:p text:style-name="P3"/>
          <text:p text:style-name="P3">516</text:p>
        </draw:line>
        <draw:line draw:style-name="gr2" draw:text-style-name="P9" draw:layer="layout" svg:x1="27.661cm" svg:y1="4.822cm" svg:x2="43.257cm" svg:y2="4.823cm">
          <text:p text:style-name="P3"/>
          <text:p text:style-name="P3">614</text:p>
        </draw:line>
        <draw:line draw:style-name="gr2" draw:text-style-name="P9" draw:layer="layout" svg:x1="24.816cm" svg:y1="1.964cm" svg:x2="43.257cm" svg:y2="1.963cm">
          <text:p text:style-name="P3"/>
          <text:p text:style-name="P3">726</text:p>
        </draw:line>
        <draw:line draw:style-name="gr2" draw:text-style-name="P9" draw:layer="layout" svg:x1="26.264cm" svg:y1="19.092cm" svg:x2="43.257cm" svg:y2="19.093cm">
          <text:p text:style-name="P3"/>
          <text:p text:style-name="P3">669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  <style:font-face style:name="Ubuntu1" svg:font-family="Ubuntu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Regular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3.3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3T10:38:15.574521000</meta:creation-date>
    <dc:date>2025-08-23T16:18:41.714288700</dc:date>
    <meta:editing-duration>PT2H28M56S</meta:editing-duration>
    <meta:editing-cycles>45</meta:editing-cycles>
    <meta:generator>LibreOffice/25.2.5.2$Windows_X86_64 LibreOffice_project/03d19516eb2e1dd5d4ccd751a0d6f35f35e08022</meta:generator>
    <dc:title>Year of the flood</dc:title>
    <meta:document-statistic meta:object-count="30"/>
  </office:meta>
</office:document-meta>
</file>