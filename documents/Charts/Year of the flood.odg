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4.11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19.23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3.6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8.771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23.93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22.23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22.61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22.487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8cm" fo:min-width="22.66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3.12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</style:style>
    <style:style style:name="P1" style:family="paragraph">
      <style:paragraph-properties fo:text-align="center"/>
      <style:text-properties style:font-name="Ubuntu1" fo:font-size="12pt"/>
    </style:style>
    <style:style style:name="P2" style:family="paragraph">
      <style:paragraph-properties fo:text-align="center" style:writing-mode="lr-tb"/>
      <style:text-properties style:font-name="Ubuntu1"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paragraph-properties fo:text-align="right"/>
    </style:style>
    <style:style style:name="P6" style:family="paragraph">
      <loext:graphic-properties draw:fill="none"/>
      <style:paragraph-properties fo:text-align="right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righ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Ubuntu1" fo:font-size="12pt"/>
    </style:style>
    <style:style style:name="T2" style:family="text">
      <style:text-properties fo:font-size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13cm" svg:height="1.588cm" svg:x="18.644cm" svg:y="21.95cm">
          <text:p text:style-name="P1"><text:span text:style-name="T1">Methuselah</text:span></text:p>
          <text:p text:style-name="P1"><text:span text:style-name="T1">969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3.394cm" svg:y1="23.539cm" svg:x2="23.394cm" svg:y2="24.809cm">
          <text:p text:style-name="P3"><text:span text:style-name="T2">187</text:span></text:p>
        </draw:line>
        <draw:custom-shape draw:style-name="gr3" draw:text-style-name="P2" draw:layer="layout" svg:width="19.736cm" svg:height="1.588cm" svg:x="23.394cm" svg:y="24.71cm">
          <text:p text:style-name="P1"><text:span text:style-name="T1">Lamech</text:span></text:p>
          <text:p text:style-name="P1"><text:span text:style-name="T1">777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8.017cm" svg:y1="26.305cm" svg:x2="28.017cm" svg:y2="27.575cm">
          <text:p text:style-name="P3"><text:span text:style-name="T2">182</text:span></text:p>
        </draw:line>
        <draw:custom-shape draw:style-name="gr4" draw:text-style-name="P2" draw:layer="layout" svg:width="24.13cm" svg:height="1.588cm" svg:x="28.017cm" svg:y="27.575cm">
          <text:p text:style-name="P1"><text:span text:style-name="T1">Noah</text:span></text:p>
          <text:p text:style-name="P1"><text:span text:style-name="T1">95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3.257cm" svg:y1="1.308cm" svg:x2="43.257cm" svg:y2="29.175cm">
          <text:p text:style-name="P5"><text:span text:style-name="T2">600</text:span></text:p>
        </draw:line>
        <draw:line draw:style-name="gr2" draw:text-style-name="P7" draw:layer="layout" svg:x1="43.13cm" svg:y1="24.71cm" svg:x2="43.257cm" svg:y2="24.71cm">
          <text:p text:style-name="P3"><text:span text:style-name="T3"/></text:p>
          <text:p text:style-name="P3"><text:span text:style-name="T3">5</text:span></text:p>
        </draw:line>
        <draw:custom-shape draw:style-name="gr6" draw:text-style-name="P2" draw:layer="layout" svg:width="9.271cm" svg:height="1.588cm" svg:x="16.993cm" svg:y="19.092cm">
          <text:p text:style-name="P1"><text:span text:style-name="T1">Enoch</text:span></text:p>
          <text:p text:style-name="P1"><text:span text:style-name="T1">36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8.644cm" svg:y1="20.68cm" svg:x2="18.644cm" svg:y2="21.95cm">
          <text:p text:style-name="P3"><text:span text:style-name="T2">65</text:span></text:p>
        </draw:line>
        <draw:custom-shape draw:style-name="gr7" draw:text-style-name="P2" draw:layer="layout" svg:width="24.435cm" svg:height="1.588cm" svg:x="12.878cm" svg:y="16.234cm">
          <text:p text:style-name="P1"><text:span text:style-name="T1">Jared</text:span></text:p>
          <text:p text:style-name="P1"><text:span text:style-name="T1">962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6.993cm" svg:y1="17.822cm" svg:x2="16.993cm" svg:y2="19.092cm">
          <text:p text:style-name="P3"><text:span text:style-name="T2">162</text:span></text:p>
        </draw:line>
        <draw:line draw:style-name="gr2" draw:text-style-name="P4" draw:layer="layout" svg:x1="12.878cm" svg:y1="14.964cm" svg:x2="12.878cm" svg:y2="16.234cm">
          <text:p text:style-name="P3"><text:span text:style-name="T2">65</text:span></text:p>
        </draw:line>
        <draw:custom-shape draw:style-name="gr8" draw:text-style-name="P2" draw:layer="layout" svg:width="22.733cm" svg:height="1.588cm" svg:x="11.227cm" svg:y="13.376cm">
          <text:p text:style-name="P1"><text:span text:style-name="T1">Mahalaleel</text:span></text:p>
          <text:p text:style-name="P1"><text:span text:style-name="T1">89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1.227cm" svg:y1="12.126cm" svg:x2="11.227cm" svg:y2="13.396cm">
          <text:p text:style-name="P3"><text:span text:style-name="T2">70</text:span></text:p>
        </draw:line>
        <draw:custom-shape draw:style-name="gr9" draw:text-style-name="P2" draw:layer="layout" svg:width="23.114cm" svg:height="1.588cm" svg:x="9.449cm" svg:y="10.538cm">
          <text:p text:style-name="P1"><text:span text:style-name="T1">Cainan</text:span></text:p>
          <text:p text:style-name="P1"><text:span text:style-name="T1">91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2.987cm" svg:height="1.588cm" svg:x="7.163cm" svg:y="7.68cm">
          <text:p text:style-name="P1"><text:span text:style-name="T1">Enos</text:span></text:p>
          <text:p text:style-name="P1"><text:span text:style-name="T1">90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449cm" svg:y1="9.268cm" svg:x2="9.449cm" svg:y2="10.538cm">
          <text:p text:style-name="P3"><text:span text:style-name="T2">90</text:span></text:p>
        </draw:line>
        <draw:custom-shape draw:style-name="gr11" draw:text-style-name="P2" draw:layer="layout" svg:width="23.165cm" svg:height="1.588cm" svg:x="4.496cm" svg:y="4.822cm">
          <text:p text:style-name="P1"><text:span text:style-name="T1">Seth</text:span></text:p>
          <text:p text:style-name="P1"><text:span text:style-name="T1">912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7.163cm" svg:y1="6.41cm" svg:x2="7.163cm" svg:y2="7.68cm">
          <text:p text:style-name="P3"><text:span text:style-name="T2">105</text:span></text:p>
        </draw:line>
        <draw:line draw:style-name="gr2" draw:text-style-name="P4" draw:layer="layout" svg:x1="4.496cm" svg:y1="3.552cm" svg:x2="4.496cm" svg:y2="4.822cm">
          <text:p text:style-name="P3"><text:span text:style-name="T2">130</text:span></text:p>
        </draw:line>
        <draw:custom-shape draw:style-name="gr12" draw:text-style-name="P2" draw:layer="layout" svg:width="23.622cm" svg:height="1.588cm" svg:x="1.194cm" svg:y="1.964cm">
          <text:p text:style-name="P1"><text:span text:style-name="T1">Adam</text:span></text:p>
          <text:p text:style-name="P1"><text:span text:style-name="T1">930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.194cm" svg:y1="1.306cm" svg:x2="43.257cm" svg:y2="1.309cm">
          <text:p text:style-name="P5">1656</text:p>
          <text:p text:style-name="P5"/>
        </draw:line>
        <draw:line draw:style-name="gr13" draw:text-style-name="P9" draw:layer="layout" svg:x1="1.194cm" svg:y1="1.306cm" svg:x2="1.194cm" svg:y2="3.552cm">
          <text:p/>
        </draw:line>
        <draw:line draw:style-name="gr2" draw:text-style-name="P9" draw:layer="layout" svg:x1="37.313cm" svg:y1="16.234cm" svg:x2="43.258cm" svg:y2="16.234cm">
          <text:p text:style-name="P3"/>
          <text:p text:style-name="P3">234</text:p>
        </draw:line>
        <draw:line draw:style-name="gr2" draw:text-style-name="P9" draw:layer="layout" svg:x1="33.96cm" svg:y1="13.385cm" svg:x2="43.257cm" svg:y2="13.385cm">
          <text:p text:style-name="P3"/>
          <text:p text:style-name="P3">366</text:p>
        </draw:line>
        <draw:line draw:style-name="gr2" draw:text-style-name="P9" draw:layer="layout" svg:x1="32.563cm" svg:y1="10.538cm" svg:x2="43.257cm" svg:y2="10.537cm">
          <text:p text:style-name="P3"/>
          <text:p text:style-name="P3">421</text:p>
        </draw:line>
        <draw:line draw:style-name="gr2" draw:text-style-name="P9" draw:layer="layout" svg:x1="30.15cm" svg:y1="7.68cm" svg:x2="43.259cm" svg:y2="7.679cm">
          <text:p text:style-name="P3"/>
          <text:p text:style-name="P3">516</text:p>
        </draw:line>
        <draw:line draw:style-name="gr2" draw:text-style-name="P9" draw:layer="layout" svg:x1="27.661cm" svg:y1="4.822cm" svg:x2="43.257cm" svg:y2="4.823cm">
          <text:p text:style-name="P3"/>
          <text:p text:style-name="P3">614</text:p>
        </draw:line>
        <draw:line draw:style-name="gr2" draw:text-style-name="P9" draw:layer="layout" svg:x1="24.816cm" svg:y1="1.964cm" svg:x2="43.257cm" svg:y2="1.963cm">
          <text:p text:style-name="P3"/>
          <text:p text:style-name="P3">726</text:p>
        </draw:line>
        <draw:line draw:style-name="gr2" draw:text-style-name="P9" draw:layer="layout" svg:x1="26.264cm" svg:y1="19.092cm" svg:x2="43.257cm" svg:y2="19.093cm">
          <text:p text:style-name="P3"/>
          <text:p text:style-name="P3">669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3.3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0:38:15.574521000</meta:creation-date>
    <dc:date>2026-07-11T12:32:00.210940230</dc:date>
    <meta:editing-duration>PT2H28M56S</meta:editing-duration>
    <meta:editing-cycles>47</meta:editing-cycles>
    <meta:generator>LibreOffice/26.2.4.2$Linux_X86_64 LibreOffice_project/64a984c51f4702dbd3710b13428c673a2f1292e7</meta:generator>
    <dc:title>Year of the flood</dc:title>
    <meta:document-statistic meta:object-count="30"/>
  </office:meta>
</office:document-meta>
</file>