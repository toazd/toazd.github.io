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BlackChancery" svg:font-family="BlackChancery" style:font-pitch="variable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Gabriela Nerd Font1" svg:font-family="'Gabriela Nerd Fon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draw:stroke="dash" draw:stroke-dash="Dot" svg:stroke-width="0.1cm" svg:stroke-color="#afd095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4.512cm" fo:min-width="18.232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cm" svg:stroke-color="#ff000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ec9ba4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cm" svg:stroke-color="#80008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7" style:family="graphic" style:parent-style-name="standard">
      <style:graphic-properties draw:fill="solid" draw:fill-color="#ec9ba4" draw:textarea-horizontal-align="justify" draw:textarea-vertical-align="middle" draw:auto-grow-height="false" fo:min-height="2.13cm" fo:min-width="2.536cm" style:writing-mode="lr-tb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1cm" svg:stroke-color="#ff0000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9" style:family="graphic" style:parent-style-name="objectwithoutfill">
      <style:graphic-properties draw:stroke="dash" draw:stroke-dash="Dot" svg:stroke-width="0.1cm" svg:stroke-color="#800080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2.634cm" fo:min-width="3.6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stroke="solid" draw:stroke-dash="Dot" svg:stroke-width="0.1cm" svg:stroke-color="#ff0000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2.549cm" fo:min-width="2.498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176cm" fo:min-width="2.532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afd095" draw:textarea-horizontal-align="justify" draw:textarea-vertical-align="middle" draw:auto-grow-height="false" fo:min-height="2.176cm" fo:min-width="2.888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ff8000" draw:fill="none" loext:fill-use-slide-background="false" draw:textarea-horizontal-align="left" draw:textarea-vertical-align="middle" draw:auto-grow-height="false" fo:min-height="2.476cm" fo:min-width="15.406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8000" draw:fill="none" loext:fill-use-slide-background="false" draw:textarea-horizontal-align="right" draw:textarea-vertical-align="top" draw:auto-grow-height="false" fo:min-height="9.638cm" fo:min-width="10.294cm" style:writing-mode="lr-tb" loext:decorative="false"/>
      <style:paragraph-properties style:writing-mode="lr-tb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afd095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stroke="dash" draw:stroke-dash="Dot" svg:stroke-width="0.1cm" svg:stroke-color="#cccccc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25" style:family="graphic" style:parent-style-name="standard">
      <style:graphic-properties draw:fill="solid" draw:fill-color="#afd095" draw:textarea-horizontal-align="justify" draw:textarea-vertical-align="middle" draw:auto-grow-height="false" fo:min-height="2.085cm" fo:min-width="2.745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038cm" fo:min-width="2.597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ff8000" draw:fill="none" loext:fill-use-slide-background="false" draw:textarea-horizontal-align="right" draw:textarea-vertical-align="top" draw:auto-grow-height="false" fo:min-height="15.13cm" fo:min-width="12.767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30" style:family="graphic" style:parent-style-name="standard">
      <style:graphic-properties draw:fill="solid" draw:fill-color="#afd095" draw:textarea-horizontal-align="justify" draw:textarea-vertical-align="middle" draw:auto-grow-height="false" fo:min-height="3.139cm" fo:min-width="3.901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8000" draw:fill="none" loext:fill-use-slide-background="false" draw:textarea-horizontal-align="justify" draw:textarea-vertical-align="middle" draw:auto-grow-height="false" fo:min-height="2.298cm" fo:min-width="8.157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fill="solid" draw:fill-color="#ec9ba4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svg:stroke-color="#ff8000" draw:fill="none" loext:fill-use-slide-background="false" draw:textarea-horizontal-align="center" draw:textarea-vertical-align="top" draw:auto-grow-height="false" fo:min-height="13.011cm" fo:min-width="3.037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8000" loext:opacity="100%" style:font-name="BlackChancery" fo:font-size="96pt" style:font-size-asian="96pt" style:font-size-complex="96pt"/>
    </style:style>
    <style:style style:name="P3" style:family="paragraph">
      <loext:graphic-properties draw:fill="none"/>
      <style:paragraph-properties fo:text-align="center" style:writing-mode="lr-tb"/>
      <style:text-properties fo:color="#ff8000" loext:opacity="100%" style:font-name="BlackChancery" fo:font-size="96pt" style:font-size-asian="96pt" style:font-size-complex="96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ec9ba4"/>
      <style:paragraph-properties fo:text-align="center" style:writing-mode="lr-tb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9" style:family="paragraph">
      <loext:graphic-properties draw:fill="solid" draw:fill-color="#729fcf"/>
      <style:paragraph-properties fo:text-align="center" style:writing-mode="lr-tb"/>
      <style:text-properties fo:font-size="12pt"/>
    </style:style>
    <style:style style:name="P10" style:family="paragraph">
      <style:paragraph-properties fo:margin-left="0cm" fo:margin-right="0cm" fo:text-align="center" fo:text-indent="0cm"/>
      <style:text-properties fo:color="#000000" loext:opacity="100%" style:font-name="Gabriela Nerd Font1" fo:font-size="12pt" style:letter-kerning="true" style:font-name-asian="Microsoft YaHei" style:font-size-asian="18pt" style:font-name-complex="Arial" style:font-size-complex="18pt"/>
    </style:style>
    <style:style style:name="P11" style:family="paragraph">
      <style:paragraph-properties fo:margin-left="0cm" fo:margin-right="0cm" fo:text-align="center" fo:text-indent="0cm" style:writing-mode="lr-tb"/>
      <style:text-properties fo:color="#000000" loext:opacity="100%" style:font-name="Gabriela Nerd Font1" fo:font-size="12pt" style:letter-kerning="true" style:font-name-asian="Microsoft YaHei" style:font-size-asian="18pt" style:font-name-complex="Arial" style:font-size-complex="18pt"/>
    </style:style>
    <style:style style:name="P12" style:family="paragraph">
      <loext:graphic-properties draw:fill="solid" draw:fill-color="#afd095"/>
      <style:paragraph-properties fo:text-align="center" style:writing-mode="lr-tb"/>
      <style:text-properties fo:font-size="12pt"/>
    </style:style>
    <style:style style:name="P13" style:family="paragraph">
      <style:paragraph-properties fo:text-align="left"/>
      <style:text-properties fo:color="#ff8000" loext:opacity="100%" fo:font-size="10pt"/>
    </style:style>
    <style:style style:name="P14" style:family="paragraph">
      <loext:graphic-properties draw:fill="none"/>
      <style:paragraph-properties fo:text-align="left" style:writing-mode="lr-tb"/>
      <style:text-properties fo:color="#ff8000" loext:opacity="100%" fo:font-size="10pt"/>
    </style:style>
    <style:style style:name="P15" style:family="paragraph">
      <style:paragraph-properties fo:text-align="right"/>
      <style:text-properties fo:color="#ff8000" loext:opacity="100%" fo:font-size="10pt" style:font-size-asian="10pt" style:font-size-complex="10pt"/>
    </style:style>
    <style:style style:name="P16" style:family="paragraph">
      <loext:graphic-properties draw:fill="none"/>
      <style:paragraph-properties fo:text-align="right" style:writing-mode="lr-tb"/>
      <style:text-properties fo:color="#ff8000" loext:opacity="100%" fo:font-size="10pt" style:font-size-asian="10pt" style:font-size-complex="10pt"/>
    </style:style>
    <style:style style:name="P17" style:family="paragraph">
      <loext:graphic-properties draw:fill="solid" draw:fill-color="#cccccc"/>
      <style:paragraph-properties fo:text-align="center" style:writing-mode="lr-tb"/>
      <style:text-properties fo:font-size="12pt"/>
    </style:style>
    <style:style style:name="P18" style:family="paragraph">
      <loext:graphic-properties draw:fill="solid" draw:fill-color="#ec9ba4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9" style:family="paragraph">
      <style:paragraph-properties fo:text-align="right"/>
      <style:text-properties fo:color="#ff8000" loext:opacity="100%"/>
    </style:style>
    <style:style style:name="P20" style:family="paragraph">
      <loext:graphic-properties draw:fill="none"/>
      <style:paragraph-properties fo:text-align="right" style:writing-mode="lr-tb"/>
      <style:text-properties fo:color="#ff8000" loext:opacity="100%"/>
    </style:style>
    <style:style style:name="P21" style:family="paragraph">
      <loext:graphic-properties draw:fill="solid" draw:fill-color="#ec9ba4"/>
      <style:paragraph-properties fo:margin-left="0cm" fo:margin-right="0cm" fo:text-align="center" fo:text-indent="0cm" style:writing-mode="lr-tb"/>
      <style:text-properties fo:color="#000000" loext:opacity="100%" style:font-name="Gabriela Nerd Font1" fo:font-size="12pt" style:letter-kerning="true" style:font-name-asian="Microsoft YaHei" style:font-size-asian="18pt" style:font-name-complex="Arial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T1" style:family="text">
      <style:text-properties fo:color="#ff8000" loext:opacity="100%" style:font-name="Gabriela Nerd Font" fo:font-size="80pt" style:font-size-asian="80pt" style:font-size-complex="80pt"/>
    </style:style>
    <style:style style:name="T2" style:family="text">
      <style:text-properties fo:color="#ff8000" loext:opacity="100%" style:font-name="BlackChancery" fo:font-size="96pt" style:font-size-asian="96pt" style:font-size-complex="96pt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style:font-size-asian="10pt" style:font-weight-asian="bold" style:font-size-complex="10pt" style:font-weight-complex="bold"/>
    </style:style>
    <style:style style:name="T9" style:family="text">
      <style:text-properties fo:color="#000000" loext:opacity="100%" style:font-name="Gabriela Nerd Font1" fo:font-size="12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10" style:family="text">
      <style:text-properties fo:color="#000000" loext:opacity="100%" style:font-name="Gabriela Nerd Font1" fo:font-size="10pt" style:letter-kerning="true" style:font-name-asian="Microsoft YaHei" style:font-size-asian="10pt" style:font-name-complex="Arial" style:font-size-complex="10pt"/>
    </style:style>
    <style:style style:name="T11" style:family="text">
      <style:text-properties fo:color="#ff8000" loext:opacity="100%" fo:font-size="10pt"/>
    </style:style>
    <style:style style:name="T12" style:family="text">
      <style:text-properties fo:color="#ff8000" loext:opacity="100%" fo:font-size="10pt" style:font-size-asian="10pt" style:font-size-complex="10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Gabriela Nerd Font1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8000" loext:opacity="100%"/>
    </style:style>
    <style:style style:name="T15" style:family="text">
      <style:text-properties fo:font-size="12pt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35.567cm" svg:y1="67.224cm" svg:x2="20.704cm" svg:y2="58.025cm" draw:start-shape="id1" draw:start-glue-point="0" draw:end-shape="id2" draw:end-glue-point="2" svg:d="M35567 67224c0-6898-14863-2299-14863-9199" svg:viewBox="0 0 14864 9200">
          <text:p/>
        </draw:connector>
        <draw:custom-shape draw:style-name="gr2" draw:text-style-name="P3" draw:layer="layout" svg:width="18.732cm" svg:height="4.762cm" svg:x="145.363cm" svg:y="5.271cm">
          <text:p text:style-name="P2"><text:span text:style-name="T1">1 </text:span><text:span text:style-name="T2">Chronicles</text:span><text:span text:style-name="T1"> 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8.462cm" svg:y1="19.402cm" svg:x2="119.881cm" svg:y2="23.565cm" draw:start-shape="id3" draw:start-glue-point="2" draw:end-shape="id4" draw:end-glue-point="0" svg:d="M118462 19402c0 3123 1419 1042 1419 4163" svg:viewBox="0 0 1420 4164">
          <text:p/>
        </draw:connector>
        <draw:custom-shape draw:style-name="gr4" draw:text-style-name="P5" xml:id="id5" draw:id="id5" draw:layer="layout" svg:width="3.048cm" svg:height="2.54cm" svg:x="121.034cm" svg:y="5.558cm">
          <text:p text:style-name="P4"><text:span text:style-name="T3">Israel</text:span></text:p>
          <text:p text:style-name="P4"><text:span text:style-name="T4">1Ch 2:1</text:span></text:p>
          <text:p text:style-name="P4"><text:span text:style-name="T3">Jacob</text:span></text:p>
          <text:p text:style-name="P4"><text:span text:style-name="T5">Gen 35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9" draw:id="id9" draw:layer="layout" svg:width="3.048cm" svg:height="2.54cm" svg:x="116.937cm" svg:y="12.961cm">
          <text:p text:style-name="P4"><text:span text:style-name="T3">Judah</text:span></text:p>
          <text:p text:style-name="P4"><text:span text:style-name="T4">1Ch 2:1</text:span></text:p>
          <text:p text:style-name="P4"><text:span text:style-name="T4">Gen 29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xml:id="id6" draw:id="id6" draw:layer="layout" svg:width="3.048cm" svg:height="2.54cm" svg:x="116.937cm" svg:y="5.561cm">
          <text:p text:style-name="P4"><text:span text:style-name="T3">Leah</text:span></text:p>
          <text:p text:style-name="P4"><text:span text:style-name="T4">Gen 29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121.034cm" svg:y1="6.828cm" svg:x2="119.985cm" svg:y2="6.831cm" draw:start-shape="id5" draw:start-glue-point="3" draw:end-shape="id6" draw:end-glue-point="1" svg:d="M121034 6828c-786 0-262 3-1049 3" svg:viewBox="0 0 1050 4">
          <text:p/>
        </draw:connector>
        <draw:connector draw:style-name="gr3" draw:text-style-name="P1" draw:layer="layout" draw:type="curve" svg:x1="125.561cm" svg:y1="15.501cm" svg:x2="122.062cm" svg:y2="16.862cm" draw:start-shape="id7" draw:start-glue-point="2" draw:end-shape="id8" draw:end-glue-point="0" svg:d="M125561 15501c0 1021-3499 341-3499 1361" svg:viewBox="0 0 3500 1362">
          <text:p/>
        </draw:connector>
        <draw:connector draw:style-name="gr3" draw:text-style-name="P1" draw:layer="layout" draw:type="curve" svg:x1="118.461cm" svg:y1="8.101cm" svg:x2="118.461cm" svg:y2="12.961cm" draw:start-shape="id6" draw:start-glue-point="2" draw:end-shape="id9" draw:end-glue-point="0" svg:d="M118461 8101v4860" svg:viewBox="0 0 1 4861">
          <text:p/>
        </draw:connector>
        <draw:connector draw:style-name="gr3" draw:text-style-name="P1" draw:layer="layout" draw:type="curve" svg:x1="125.561cm" svg:y1="15.501cm" svg:x2="125.561cm" svg:y2="16.861cm" draw:start-shape="id7" draw:start-glue-point="2" draw:end-shape="id10" draw:end-glue-point="0" svg:d="M125561 15501v1360" svg:viewBox="0 0 1 1361">
          <text:p/>
        </draw:connector>
        <draw:custom-shape draw:style-name="gr4" draw:text-style-name="P5" xml:id="id10" draw:id="id10" draw:layer="layout" svg:width="3.048cm" svg:height="2.54cm" svg:x="124.037cm" svg:y="16.861cm">
          <text:p text:style-name="P4"><text:span text:style-name="T3">Onan</text:span></text:p>
          <text:p text:style-name="P4"><text:span text:style-name="T4">1Ch 2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" draw:id="id8" draw:layer="layout" svg:width="3.048cm" svg:height="2.54cm" svg:x="120.538cm" svg:y="16.862cm">
          <text:p text:style-name="P4"><text:span text:style-name="T6">Er</text:span></text:p>
          <text:p text:style-name="P4"><text:span text:style-name="T4">1Ch 2:3</text:span></text:p>
          <text:p text:style-name="P4"><text:span text:style-name="T4">Gen 38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1" draw:id="id11" draw:layer="layout" svg:width="3.048cm" svg:height="2.54cm" svg:x="127.538cm" svg:y="16.862cm">
          <text:p text:style-name="P4"><text:span text:style-name="T3">Shelah</text:span></text:p>
          <text:p text:style-name="P4"><text:span text:style-name="T4">1Ch 2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1" draw:layer="layout" draw:type="curve" svg:x1="125.561cm" svg:y1="15.501cm" svg:x2="129.062cm" svg:y2="16.862cm" draw:start-shape="id7" draw:end-shape="id11" draw:end-glue-point="0" svg:d="M125561 15501c0 1021 3501 341 3501 1361" svg:viewBox="0 0 3502 1362">
          <text:p/>
        </draw:connector>
        <draw:custom-shape draw:style-name="gr5" draw:text-style-name="P6" xml:id="id7" draw:id="id7" draw:layer="layout" svg:width="3.048cm" svg:height="2.54cm" svg:x="124.037cm" svg:y="12.961cm">
          <text:p text:style-name="P4"><text:span text:style-name="T3">Unknown</text:span></text:p>
          <text:p text:style-name="P4"><text:span text:style-name="T4">1Ch 2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2" draw:id="id12" draw:layer="layout" svg:width="3.048cm" svg:height="2.642cm" svg:x="124.038cm" svg:y="9.762cm">
          <text:p text:style-name="P4"><text:span text:style-name="T3">Shua</text:span></text:p>
          <text:p text:style-name="P4"><text:span text:style-name="T4">Canaanitess</text:span></text:p>
          <text:p text:style-name="P4"><text:span text:style-name="T4">1Ch 2:3</text:span></text:p>
          <text:p text:style-name="P4"><text:span text:style-name="T7">Shuah</text:span></text:p>
          <text:p text:style-name="P4"><text:span text:style-name="T4">Gen 38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118.461cm" svg:y1="15.501cm" svg:x2="118.462cm" svg:y2="16.862cm" draw:start-shape="id9" draw:start-glue-point="2" draw:end-shape="id3" draw:end-glue-point="0" svg:d="M118461 15501c0 1021 1 341 1 1361" svg:viewBox="0 0 2 1362">
          <text:p/>
        </draw:connector>
        <draw:connector draw:style-name="gr6" draw:text-style-name="P1" draw:layer="layout" draw:type="curve" svg:x1="124.037cm" svg:y1="14.231cm" svg:x2="119.985cm" svg:y2="14.231cm" draw:start-shape="id7" draw:start-glue-point="3" draw:end-shape="id9" draw:end-glue-point="1" svg:d="M124037 14231h-4052" svg:viewBox="0 0 4053 1">
          <text:p/>
        </draw:connector>
        <draw:connector draw:style-name="gr8" draw:text-style-name="P1" draw:layer="layout" draw:type="curve" svg:x1="125.562cm" svg:y1="12.404cm" svg:x2="125.561cm" svg:y2="12.961cm" draw:start-shape="id12" draw:start-glue-point="2" draw:end-shape="id7" draw:end-glue-point="0" svg:d="M125562 12404c0 418-1 140-1 557" svg:viewBox="0 0 2 558">
          <text:p/>
        </draw:connector>
        <draw:custom-shape draw:style-name="gr5" draw:text-style-name="P6" xml:id="id3" draw:id="id3" draw:layer="layout" svg:width="3.048cm" svg:height="2.54cm" svg:x="116.938cm" svg:y="16.862cm">
          <text:p text:style-name="P4"><text:span text:style-name="T3">Tamar</text:span></text:p>
          <text:p text:style-name="P4"><text:span text:style-name="T4">1Ch 2:4</text:span></text:p>
          <text:p text:style-name="P4"><text:span text:style-name="T4">Gen 38:24-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" draw:layer="layout" draw:type="curve" svg:x1="120.538cm" svg:y1="18.132cm" svg:x2="119.986cm" svg:y2="18.132cm" draw:start-shape="id8" draw:start-glue-point="3" draw:end-shape="id3" draw:end-glue-point="1" svg:d="M120538 18132h-552" svg:viewBox="0 0 553 1">
          <text:p/>
        </draw:connector>
        <draw:connector draw:style-name="gr3" draw:text-style-name="P1" draw:layer="layout" draw:type="curve" svg:x1="28.799cm" svg:y1="24.091cm" svg:x2="118.462cm" svg:y2="19.402cm" draw:start-shape="id13" draw:start-glue-point="0" draw:end-shape="id3" svg:d="M28799 24091c0-3516 89663-1172 89663-4689" svg:viewBox="0 0 89664 4690">
          <text:p/>
        </draw:connector>
        <draw:connector draw:style-name="gr6" draw:text-style-name="P1" draw:layer="layout" draw:type="curve" svg:x1="19.184cm" svg:y1="53.391cm" svg:x2="17.612cm" svg:y2="53.392cm" draw:start-shape="id14" draw:start-glue-point="3" draw:end-shape="id15" draw:end-glue-point="1" svg:d="M19184 53391c-1177 0-392 1-1572 1" svg:viewBox="0 0 1573 2">
          <text:p/>
        </draw:connector>
        <draw:custom-shape draw:style-name="gr10" draw:text-style-name="P8" xml:id="id15" draw:id="id15" draw:layer="layout" svg:width="4.166cm" svg:height="3.2cm" svg:x="13.446cm" svg:y="51.792cm">
          <text:p text:style-name="P7"><text:span text:style-name="T8">Chelubai</text:span></text:p>
          <text:p text:style-name="P7"><text:span text:style-name="T4">1Ch 2:9</text:span></text:p>
          <text:p text:style-name="P7"><text:span text:style-name="T8">Caleb</text:span></text:p>
          <text:p text:style-name="P7"><text:span text:style-name="T4">1Ch 2:18,42,46,48,49</text:span></text:p>
          <text:p text:style-name="P7"><text:span text:style-name="T4">Num 13:6, 32:12</text:span></text:p>
          <text:p text:style-name="P7"><text:span text:style-name="T4">1Ch 6: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8.816cm" svg:y1="30.732cm" svg:x2="28.813cm" svg:y2="31.433cm" draw:start-shape="id16" draw:start-glue-point="2" draw:end-shape="id17" draw:end-glue-point="0" svg:d="M28816 30732c0 526-3 176-3 701" svg:viewBox="0 0 4 702">
          <text:p/>
        </draw:connector>
        <draw:connector draw:style-name="gr11" draw:text-style-name="P1" draw:layer="layout" draw:type="curve" svg:x1="28.799cm" svg:y1="27.19cm" svg:x2="28.816cm" svg:y2="28.192cm" draw:start-shape="id13" draw:start-glue-point="2" draw:end-shape="id16" draw:end-glue-point="0" svg:d="M28799 27190c0 751 17 251 17 1002" svg:viewBox="0 0 18 1003">
          <text:p/>
        </draw:connector>
        <draw:custom-shape draw:style-name="gr12" draw:text-style-name="P5" xml:id="id13" draw:id="id13" draw:layer="layout" svg:width="3.048cm" svg:height="3.099cm" svg:x="27.275cm" svg:y="24.091cm">
          <text:p text:style-name="P4"><text:span text:style-name="T3">Pharez</text:span></text:p>
          <text:p text:style-name="P4"><text:span text:style-name="T4">1Ch 2:4</text:span></text:p>
          <text:p text:style-name="P4"><text:span text:style-name="T4">Rth 4:18</text:span></text:p>
          <text:p text:style-name="P4"><text:span text:style-name="T7">Perez</text:span></text:p>
          <text:p text:style-name="P4"><text:span text:style-name="T4">1Ch 27:3</text:span></text:p>
          <text:p text:style-name="P4"><text:span text:style-name="T4">Neh 11:4,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6" draw:id="id16" draw:layer="layout" svg:width="3.048cm" svg:height="2.54cm" svg:x="27.292cm" svg:y="28.192cm">
          <text:p text:style-name="P4"><text:span text:style-name="T3">Hezron</text:span></text:p>
          <text:p text:style-name="P4"><text:span text:style-name="T4">1Ch 2:5</text:span></text:p>
          <text:p text:style-name="P4"><text:span text:style-name="T7">Esrom</text:span></text:p>
          <text:p text:style-name="P4"><text:span text:style-name="T4">Mat 1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1" draw:layer="layout" draw:type="curve" svg:x1="20.704cm" svg:y1="55.485cm" svg:x2="20.708cm" svg:y2="54.661cm" draw:start-shape="id2" draw:start-glue-point="0" draw:end-shape="id14" draw:end-glue-point="2" svg:d="M20704 55485c0-616 4-205 4-824" svg:viewBox="0 0 5 825">
          <text:p/>
        </draw:connector>
        <draw:connector draw:style-name="gr8" draw:text-style-name="P1" draw:layer="layout" draw:type="curve" svg:x1="20.723cm" svg:y1="62.293cm" svg:x2="20.721cm" svg:y2="62.951cm" draw:start-shape="id18" draw:start-glue-point="2" draw:end-shape="id19" draw:end-glue-point="0" svg:d="M20723 62293c0 495-2 166-2 658" svg:viewBox="0 0 3 659">
          <text:p/>
        </draw:connector>
        <draw:connector draw:style-name="gr8" draw:text-style-name="P1" draw:layer="layout" draw:type="curve" svg:x1="20.721cm" svg:y1="65.491cm" svg:x2="18.722cm" svg:y2="68.552cm" draw:start-shape="id19" draw:start-glue-point="2" draw:end-shape="id20" draw:end-glue-point="0" svg:d="M20721 65491c0 2296-1999 766-1999 3061" svg:viewBox="0 0 2000 3062">
          <text:p/>
        </draw:connector>
        <draw:connector draw:style-name="gr3" draw:text-style-name="P1" draw:layer="layout" draw:type="curve" svg:x1="20.704cm" svg:y1="58.025cm" svg:x2="15.722cm" svg:y2="59.752cm" draw:start-shape="id2" draw:start-glue-point="2" draw:end-shape="id21" draw:end-glue-point="0" svg:d="M20704 58025c0 1296-4982 433-4982 1727" svg:viewBox="0 0 4983 1728">
          <text:p/>
        </draw:connector>
        <draw:connector draw:style-name="gr3" draw:text-style-name="P1" draw:layer="layout" draw:type="curve" svg:x1="15.722cm" svg:y1="62.292cm" svg:x2="15.723cm" svg:y2="62.953cm" draw:start-shape="id21" draw:start-glue-point="2" draw:end-shape="id22" draw:end-glue-point="0" svg:d="M15722 62292c0 496 1 166 1 661" svg:viewBox="0 0 2 662">
          <text:p/>
        </draw:connector>
        <draw:custom-shape draw:style-name="gr5" draw:text-style-name="P6" xml:id="id14" draw:id="id14" draw:layer="layout" svg:width="3.048cm" svg:height="2.54cm" svg:x="19.184cm" svg:y="52.121cm">
          <text:p text:style-name="P4"><text:span text:style-name="T3">Ephrath</text:span></text:p>
          <text:p text:style-name="P4"><text:span text:style-name="T4">1Ch 2:19</text:span></text:p>
          <text:p text:style-name="P4"><text:span text:style-name="T7">Ephratah</text:span></text:p>
          <text:p text:style-name="P4"><text:span text:style-name="T4">1Ch 2:50, 4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" draw:id="id2" draw:layer="layout" svg:width="3.048cm" svg:height="2.54cm" svg:x="19.18cm" svg:y="55.485cm">
          <text:p text:style-name="P4"><text:span text:style-name="T6">Hur</text:span></text:p>
          <text:p text:style-name="P4"><text:span text:style-name="T4">1Ch 2:19,50, 4:1,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21" draw:id="id21" draw:layer="layout" svg:width="3.048cm" svg:height="2.54cm" svg:x="14.198cm" svg:y="59.752cm">
          <text:p text:style-name="P4"><text:span text:style-name="T3">Uri</text:span></text:p>
          <text:p text:style-name="P4"><text:span text:style-name="T4">1Ch 2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2" draw:id="id22" draw:layer="layout" svg:width="3.048cm" svg:height="2.54cm" svg:x="14.199cm" svg:y="62.953cm">
          <text:p text:style-name="P4"><text:span text:style-name="T3">Bezaleel</text:span></text:p>
          <text:p text:style-name="P4"><text:span text:style-name="T4">1Ch 2:20</text:span></text:p>
          <text:p text:style-name="P4"><text:span text:style-name="T4">Exo 31:2,30, 36:1,2, 37:1, 38:22, 2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8" draw:id="id18" draw:layer="layout" svg:width="3.048cm" svg:height="2.54cm" svg:x="19.199cm" svg:y="59.753cm">
          <text:p text:style-name="P4"><text:span text:style-name="T3">Caleb</text:span></text:p>
          <text:p text:style-name="P4"><text:span text:style-name="T4">1Ch 2: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9" draw:id="id19" draw:layer="layout" svg:width="3.048cm" svg:height="2.54cm" svg:x="19.197cm" svg:y="62.951cm">
          <text:p text:style-name="P4"><text:span text:style-name="T3">Shobal</text:span></text:p>
          <text:p text:style-name="P4"><text:span text:style-name="T4">1Ch 2: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0" draw:id="id20" draw:layer="layout" svg:width="3.048cm" svg:height="2.54cm" svg:x="17.198cm" svg:y="68.552cm">
          <text:p text:style-name="P4"><text:span text:style-name="T3">Haroeh</text:span></text:p>
          <text:p text:style-name="P4"><text:span text:style-name="T4">1Ch 2:5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19.905cm" svg:y1="33.369cm" svg:x2="119.89cm" svg:y2="32.708cm" draw:start-shape="id23" draw:start-glue-point="0" draw:end-shape="id24" draw:end-glue-point="2" svg:d="M119905 33369c0-495-15-165-15-661" svg:viewBox="0 0 16 662">
          <text:p/>
        </draw:connector>
        <draw:connector draw:style-name="gr8" draw:text-style-name="P1" draw:layer="layout" draw:type="curve" svg:x1="119.883cm" svg:y1="29.507cm" svg:x2="119.89cm" svg:y2="30.168cm" draw:start-shape="id25" draw:start-glue-point="2" draw:end-shape="id24" draw:end-glue-point="0" svg:d="M119883 29507c0 496 7 166 7 661" svg:viewBox="0 0 8 662">
          <text:p/>
        </draw:connector>
        <draw:connector draw:style-name="gr8" draw:text-style-name="P1" draw:layer="layout" draw:type="curve" svg:x1="119.881cm" svg:y1="26.257cm" svg:x2="119.883cm" svg:y2="26.967cm" draw:start-shape="id4" draw:start-glue-point="2" draw:end-shape="id25" draw:end-glue-point="0" svg:d="M119881 26257c0 534 2 179 2 710" svg:viewBox="0 0 3 711">
          <text:p/>
        </draw:connector>
        <draw:custom-shape draw:style-name="gr14" draw:text-style-name="P5" xml:id="id4" draw:id="id4" draw:layer="layout" svg:width="3.048cm" svg:height="2.692cm" svg:x="118.357cm" svg:y="23.565cm">
          <text:p text:style-name="P4"><text:span text:style-name="T3">Zerah</text:span></text:p>
          <text:p text:style-name="P4"><text:span text:style-name="T4">1Ch 2:4</text:span></text:p>
          <text:p text:style-name="P4"><text:span text:style-name="T4">Neh 11:24</text:span></text:p>
          <text:p text:style-name="P4"><text:span text:style-name="T7">Zarah</text:span></text:p>
          <text:p text:style-name="P4"><text:span text:style-name="T4">Gen 38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5" draw:id="id25" draw:layer="layout" svg:width="3.048cm" svg:height="2.54cm" svg:x="118.359cm" svg:y="26.967cm">
          <text:p text:style-name="P4"><text:span text:style-name="T3">Zimri</text:span></text:p>
          <text:p text:style-name="P4"><text:span text:style-name="T4">1Ch 2:6</text:span></text:p>
          <text:p text:style-name="P7"><text:span text:style-name="T8">Zabdi</text:span></text:p>
          <text:p text:style-name="P7"><text:span text:style-name="T4">Jos 7:1,17,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4" draw:id="id24" draw:layer="layout" svg:width="3.048cm" svg:height="2.54cm" svg:x="118.366cm" svg:y="30.168cm">
          <text:p text:style-name="P4"><text:span text:style-name="T3">Carmi</text:span></text:p>
          <text:p text:style-name="P4"><text:span text:style-name="T4">Jos 7:1,18</text:span></text:p>
          <text:p text:style-name="P4"><text:span text:style-name="T4">1Ch 2:7, 4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3" draw:id="id23" draw:layer="layout" svg:width="3.048cm" svg:height="2.54cm" svg:x="118.381cm" svg:y="33.369cm">
          <text:p text:style-name="P4"><text:span text:style-name="T3">Achar</text:span></text:p>
          <text:p text:style-name="P4"><text:span text:style-name="T4">1Ch 2:7</text:span></text:p>
          <text:p text:style-name="P4"><text:span text:style-name="T7">Achan</text:span></text:p>
          <text:p text:style-name="P4"><text:span text:style-name="T4">Jos 7:1,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6" draw:id="id26" draw:layer="layout" svg:width="3.048cm" svg:height="2.54cm" svg:x="14.013cm" svg:y="36.268cm">
          <text:p text:style-name="P4"><text:span text:style-name="T3">Jephunneh</text:span></text:p>
          <text:p text:style-name="P4"><text:span text:style-name="T4">Num 13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7" draw:id="id17" draw:layer="layout" svg:width="3.048cm" svg:height="2.54cm" svg:x="27.289cm" svg:y="31.433cm">
          <text:p text:style-name="P4"><text:span text:style-name="T3">Kenaz</text:span></text:p>
          <text:p text:style-name="P4"><text:span text:style-name="T4">Num 32:12</text:span></text:p>
          <text:p text:style-name="P4"><text:span text:style-name="T4">Jos 14:6,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5.537cm" svg:y1="36.268cm" svg:x2="28.813cm" svg:y2="33.973cm" draw:start-shape="id26" draw:start-glue-point="0" draw:end-shape="id17" draw:end-glue-point="2" svg:d="M15537 36268c0-1720 13276-573 13276-2295" svg:viewBox="0 0 13277 2296">
          <text:p/>
        </draw:connector>
        <draw:connector draw:style-name="gr8" draw:text-style-name="P1" draw:layer="layout" draw:type="curve" svg:x1="7.61cm" svg:y1="39.912cm" svg:x2="7.609cm" svg:y2="38.851cm" draw:start-shape="id27" draw:start-glue-point="0" draw:end-shape="id28" draw:end-glue-point="2" svg:d="M7610 39912c0-795-1-265-1-1061" svg:viewBox="0 0 2 1062">
          <text:p/>
        </draw:connector>
        <draw:connector draw:style-name="gr8" draw:text-style-name="P1" draw:layer="layout" draw:type="curve" svg:x1="11.41cm" svg:y1="36.312cm" svg:x2="28.813cm" svg:y2="33.973cm" draw:start-shape="id29" draw:start-glue-point="0" draw:end-shape="id17" draw:end-glue-point="2" svg:d="M11410 36312c0-1753 17403-584 17403-2339" svg:viewBox="0 0 17404 2340">
          <text:p/>
        </draw:connector>
        <draw:connector draw:style-name="gr8" draw:text-style-name="P1" draw:layer="layout" draw:type="curve" svg:x1="11.411cm" svg:y1="39.913cm" svg:x2="11.41cm" svg:y2="38.852cm" draw:start-shape="id30" draw:start-glue-point="0" draw:end-shape="id29" draw:end-glue-point="2" svg:d="M11411 39913c0-795-1-265-1-1061" svg:viewBox="0 0 2 1062">
          <text:p/>
        </draw:connector>
        <draw:connector draw:style-name="gr8" draw:text-style-name="P1" draw:layer="layout" draw:type="curve" svg:x1="28.813cm" svg:y1="33.973cm" svg:x2="7.609cm" svg:y2="36.311cm" draw:start-shape="id17" draw:start-glue-point="2" draw:end-shape="id28" draw:end-glue-point="0" svg:d="M28813 33973c0 1755-21204 586-21204 2338" svg:viewBox="0 0 21205 2339">
          <text:p/>
        </draw:connector>
        <draw:custom-shape draw:style-name="gr15" draw:text-style-name="P11" xml:id="id28" draw:id="id28" draw:layer="layout" svg:width="3.048cm" svg:height="2.54cm" svg:x="6.085cm" svg:y="36.311cm">
          <text:p text:style-name="P10"><text:span text:style-name="T9">Seraiah</text:span></text:p>
          <text:p text:style-name="P10"><text:span text:style-name="T10">1Ch 4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1" xml:id="id27" draw:id="id27" draw:layer="layout" svg:width="3.048cm" svg:height="2.54cm" svg:x="6.086cm" svg:y="39.912cm">
          <text:p text:style-name="P10"><text:span text:style-name="T9">Joab</text:span></text:p>
          <text:p text:style-name="P10"><text:span text:style-name="T10">1Ch 4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1" xml:id="id29" draw:id="id29" draw:layer="layout" svg:width="3.048cm" svg:height="2.54cm" svg:x="9.886cm" svg:y="36.312cm">
          <text:p text:style-name="P10"><text:span text:style-name="T9">Meonothai</text:span></text:p>
          <text:p text:style-name="P10"><text:span text:style-name="T10">1Ch 4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11" xml:id="id30" draw:id="id30" draw:layer="layout" svg:width="3.048cm" svg:height="2.54cm" svg:x="9.887cm" svg:y="39.913cm">
          <text:p text:style-name="P10"><text:span text:style-name="T9">Ophrah</text:span></text:p>
          <text:p text:style-name="P10"><text:span text:style-name="T10">1Ch 4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12" xml:id="id31" draw:id="id31" draw:layer="layout" svg:width="3.404cm" svg:height="2.692cm" svg:x="5.908cm" svg:y="43.003cm">
          <text:p text:style-name="P4"><text:span text:style-name="T3">Valley of Charashim</text:span></text:p>
          <text:p text:style-name="P4"><text:span text:style-name="T4">(craftsman)</text:span></text:p>
          <text:p text:style-name="P4"><text:span text:style-name="T4">1Ch 4:14</text:span></text:p>
          <text:p text:style-name="P4"><text:span text:style-name="T4">Neh 1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7.61cm" svg:y1="43.003cm" svg:x2="7.61cm" svg:y2="42.452cm" draw:start-shape="id31" draw:start-glue-point="0" draw:end-shape="id27" draw:end-glue-point="2" svg:d="M7610 43003v-551" svg:viewBox="0 0 1 552">
          <text:p/>
        </draw:connector>
        <draw:connector draw:style-name="gr8" draw:text-style-name="P1" draw:layer="layout" draw:type="curve" svg:x1="15.529cm" svg:y1="51.792cm" svg:x2="15.537cm" svg:y2="38.808cm" draw:start-shape="id15" draw:start-glue-point="0" draw:end-shape="id26" draw:end-glue-point="2" svg:d="M15529 51792c0-9736 8-3245 8-12984" svg:viewBox="0 0 9 12985">
          <text:p/>
        </draw:connector>
        <draw:connector draw:style-name="gr8" draw:text-style-name="P1" draw:layer="layout" draw:type="curve" svg:x1="20.723cm" svg:y1="59.753cm" svg:x2="20.704cm" svg:y2="58.025cm" draw:start-shape="id18" draw:start-glue-point="0" draw:end-shape="id2" draw:end-glue-point="2" svg:d="M20723 59753c0-1294-19-431-19-1728" svg:viewBox="0 0 20 1729">
          <text:p/>
        </draw:connector>
        <draw:custom-shape draw:style-name="gr4" draw:text-style-name="P5" xml:id="id32" draw:id="id32" draw:layer="layout" svg:width="3.048cm" svg:height="2.54cm" svg:x="21.199cm" svg:y="68.553cm">
          <text:p text:style-name="P4"><text:span text:style-name="T3">Reaiah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0.721cm" svg:y1="65.491cm" svg:x2="22.723cm" svg:y2="68.553cm" draw:start-shape="id19" draw:start-glue-point="2" draw:end-shape="id32" draw:end-glue-point="0" svg:d="M20721 65491c0 2298 2002 767 2002 3062" svg:viewBox="0 0 2003 3063">
          <text:p/>
        </draw:connector>
        <draw:custom-shape draw:style-name="gr20" draw:text-style-name="P14" draw:layer="layout" svg:width="15.954cm" svg:height="3.024cm" svg:x="8.595cm" svg:y="68.328cm">
          <text:p text:style-name="P13"><text:span text:style-name="T11">Some footnotes and commentators assert</text:span></text:p>
          <text:p text:style-name="P13"><text:span text:style-name="T11">that these two men are the same but we</text:span></text:p>
          <text:p text:style-name="P13"><text:span text:style-name="T11">cannot prove that with the Bibl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33" draw:id="id33" draw:layer="layout" svg:width="3.048cm" svg:height="2.54cm" svg:x="21.2cm" svg:y="72.254cm">
          <text:p text:style-name="P4"><text:span text:style-name="T3">Jahath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2.723cm" svg:y1="71.093cm" svg:x2="22.724cm" svg:y2="72.254cm" draw:start-shape="id32" draw:start-glue-point="2" draw:end-shape="id33" draw:end-glue-point="0" svg:d="M22723 71093c0 871 1 291 1 1161" svg:viewBox="0 0 2 1162">
          <text:p/>
        </draw:connector>
        <draw:custom-shape draw:style-name="gr4" draw:text-style-name="P5" xml:id="id34" draw:id="id34" draw:layer="layout" svg:width="3.048cm" svg:height="2.54cm" svg:x="21.201cm" svg:y="75.855cm">
          <text:p text:style-name="P4"><text:span text:style-name="T3">Ahumai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2.724cm" svg:y1="74.794cm" svg:x2="22.725cm" svg:y2="75.855cm" draw:start-shape="id33" draw:start-glue-point="2" draw:end-shape="id34" draw:end-glue-point="0" svg:d="M22724 74794c0 796 1 266 1 1061" svg:viewBox="0 0 2 1062">
          <text:p/>
        </draw:connector>
        <draw:custom-shape draw:style-name="gr4" draw:text-style-name="P5" xml:id="id35" draw:id="id35" draw:layer="layout" svg:width="3.048cm" svg:height="2.54cm" svg:x="25.002cm" svg:y="75.856cm">
          <text:p text:style-name="P4"><text:span text:style-name="T3">Lahad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6.526cm" svg:y1="75.856cm" svg:x2="22.724cm" svg:y2="74.794cm" draw:start-shape="id35" draw:start-glue-point="0" draw:end-shape="id33" draw:end-glue-point="2" svg:d="M26526 75856c0-795-3802-264-3802-1062" svg:viewBox="0 0 3803 1063">
          <text:p/>
        </draw:connector>
        <draw:custom-shape draw:style-name="gr21" draw:text-style-name="P16" draw:layer="layout" svg:width="11.618cm" svg:height="10.962cm" svg:x="20.66cm" svg:y="67.987cm">
          <text:p text:style-name="P15"><text:span text:style-name="T12">The families of the Zorathites</text:span></text:p>
          <text:p text:style-name="P15"><text:span text:style-name="T12"/></text:p>
          <text:p text:style-name="P15"><text:span text:style-name="T12">Zoreah/Zorah (pre-captivity) and</text:span></text:p>
          <text:p text:style-name="P15"><text:span text:style-name="T12">Zareah (post-captivity) was a city given</text:span></text:p>
          <text:p text:style-name="P15"><text:span text:style-name="T12">to both Judah &amp; Dan (Jos 15:33, 19:41)</text:span></text:p>
          <text:p text:style-name="P15"><text:span text:style-name="T12"/></text:p>
          <text:p text:style-name="P15"><text:span text:style-name="T12">Zorah, Zoreah, Zareah (Judah)</text:span></text:p>
          <text:p text:style-name="P15"><text:span text:style-name="T12">Jos 15:33, 2Ch 11:10, Neh 11:29</text:span></text:p>
          <text:p text:style-name="P15"><text:span text:style-name="T12"/></text:p>
          <text:p text:style-name="P15"><text:span text:style-name="T12">Zorah (Dan)</text:span></text:p>
          <text:p text:style-name="P15"><text:span text:style-name="T12">Jos 19:41, Jdg 13:2,25, 16:31, 18:2,8,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37" draw:id="id37" draw:layer="layout" svg:width="3.048cm" svg:height="2.54cm" svg:x="45.128cm" svg:y="61.785cm">
          <text:p text:style-name="P4"><text:span text:style-name="T3">The father of Etam</text:span></text:p>
          <text:p text:style-name="P4"><text:span text:style-name="T4">1Ch 4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36" draw:id="id36" draw:layer="layout" svg:width="3.048cm" svg:height="2.54cm" svg:x="39.378cm" svg:y="67.5cm">
          <text:p text:style-name="P4"><text:span text:style-name="T3">Jezreel</text:span></text:p>
          <text:p text:style-name="P4"><text:span text:style-name="T4">1Ch 4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38" draw:id="id38" draw:layer="layout" svg:width="3.048cm" svg:height="2.54cm" svg:x="42.979cm" svg:y="67.501cm">
          <text:p text:style-name="P4"><text:span text:style-name="T3">Ishma</text:span></text:p>
          <text:p text:style-name="P4"><text:span text:style-name="T4">1Ch 4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39" draw:id="id39" draw:layer="layout" svg:width="3.048cm" svg:height="2.54cm" svg:x="46.58cm" svg:y="67.502cm">
          <text:p text:style-name="P4"><text:span text:style-name="T3">Idbash</text:span></text:p>
          <text:p text:style-name="P4"><text:span text:style-name="T4">1Ch 4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xml:id="id40" draw:id="id40" draw:layer="layout" svg:width="3.048cm" svg:height="2.54cm" svg:x="50.281cm" svg:y="67.503cm">
          <text:p text:style-name="P4"><text:span text:style-name="T3">Hazelelponi</text:span></text:p>
          <text:p text:style-name="P4"><text:span text:style-name="T4">1Ch 4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40.902cm" svg:y1="67.5cm" svg:x2="46.652cm" svg:y2="64.325cm" draw:start-shape="id36" draw:start-glue-point="0" draw:end-shape="id37" draw:end-glue-point="2" svg:d="M40902 67500c0-2380 5750-793 5750-3175" svg:viewBox="0 0 5751 3176">
          <text:p/>
        </draw:connector>
        <draw:connector draw:style-name="gr8" draw:text-style-name="P1" draw:layer="layout" draw:type="curve" svg:x1="44.503cm" svg:y1="67.501cm" svg:x2="46.652cm" svg:y2="64.325cm" draw:start-shape="id38" draw:start-glue-point="0" draw:end-shape="id37" draw:end-glue-point="2" svg:d="M44503 67501c0-2380 2149-793 2149-3176" svg:viewBox="0 0 2150 3177">
          <text:p/>
        </draw:connector>
        <draw:connector draw:style-name="gr8" draw:text-style-name="P1" draw:layer="layout" draw:type="curve" svg:x1="48.104cm" svg:y1="67.502cm" svg:x2="46.652cm" svg:y2="64.325cm" draw:start-shape="id39" draw:start-glue-point="0" draw:end-shape="id37" draw:end-glue-point="2" svg:d="M48104 67502c0-2382-1452-794-1452-3177" svg:viewBox="0 0 1453 3178">
          <text:p/>
        </draw:connector>
        <draw:connector draw:style-name="gr8" draw:text-style-name="P1" draw:layer="layout" draw:type="curve" svg:x1="51.805cm" svg:y1="67.503cm" svg:x2="46.652cm" svg:y2="64.325cm" draw:start-shape="id40" draw:start-glue-point="0" draw:end-shape="id37" draw:end-glue-point="2" svg:d="M51805 67503c0-2382-5153-793-5153-3178" svg:viewBox="0 0 5154 3179">
          <text:p/>
        </draw:connector>
        <draw:connector draw:style-name="gr8" draw:text-style-name="P1" draw:layer="layout" draw:type="curve" svg:x1="46.652cm" svg:y1="61.785cm" svg:x2="20.704cm" svg:y2="58.025cm" draw:start-shape="id37" draw:start-glue-point="0" draw:end-shape="id2" draw:end-glue-point="2" svg:d="M46652 61785c0-2818-25948-939-25948-3760" svg:viewBox="0 0 25949 3761">
          <text:p/>
        </draw:connector>
        <draw:custom-shape draw:style-name="gr23" draw:text-style-name="P12" xml:id="id41" draw:id="id41" draw:layer="layout" svg:width="3.048cm" svg:height="2.54cm" svg:x="53.982cm" svg:y="67.504cm">
          <text:p text:style-name="P4"><text:span text:style-name="T3">Etam</text:span></text:p>
          <text:p text:style-name="P4"><text:span text:style-name="T4">Jdg 15:8,11, 1Ch 4:3,32, 2Ch 11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55.506cm" svg:y1="67.504cm" svg:x2="46.652cm" svg:y2="64.325cm" draw:start-shape="id41" draw:start-glue-point="0" draw:end-shape="id37" draw:end-glue-point="2" svg:d="M55506 67504c0-2383-8854-794-8854-3179" svg:viewBox="0 0 8855 3180">
          <text:p/>
        </draw:connector>
        <draw:custom-shape draw:style-name="gr4" draw:text-style-name="P5" xml:id="id42" draw:id="id42" draw:layer="layout" svg:width="3.048cm" svg:height="2.54cm" svg:x="57.603cm" svg:y="67.477cm">
          <text:p text:style-name="P4"><text:span text:style-name="T3">Penuel</text:span></text:p>
          <text:p text:style-name="P4"><text:span text:style-name="T4">1Ch 4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59.127cm" svg:y1="67.477cm" svg:x2="46.652cm" svg:y2="64.325cm" draw:start-shape="id42" draw:start-glue-point="0" draw:end-shape="id37" draw:end-glue-point="2" svg:d="M59127 67477c0-2362-12475-787-12475-3152" svg:viewBox="0 0 12476 3153">
          <text:p/>
        </draw:connector>
        <draw:custom-shape draw:style-name="gr22" draw:text-style-name="P17" xml:id="id43" draw:id="id43" draw:layer="layout" svg:width="3.048cm" svg:height="2.54cm" svg:x="57.604cm" svg:y="71.178cm">
          <text:p text:style-name="P4"><text:span text:style-name="T3">Gedor</text:span></text:p>
          <text:p text:style-name="P4"><text:span text:style-name="T4">1Ch 4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44" draw:id="id44" draw:layer="layout" svg:width="3.048cm" svg:height="2.54cm" svg:x="61.304cm" svg:y="67.478cm">
          <text:p text:style-name="P4"><text:span text:style-name="T3">Ezer</text:span></text:p>
          <text:p text:style-name="P4"><text:span text:style-name="T4">1Ch 4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45" draw:id="id45" draw:layer="layout" svg:width="3.048cm" svg:height="2.54cm" svg:x="61.305cm" svg:y="71.179cm">
          <text:p text:style-name="P4"><text:span text:style-name="T3">Hushah</text:span></text:p>
          <text:p text:style-name="P4"><text:span text:style-name="T4">1Ch 4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4" draw:text-style-name="P1" draw:layer="layout" draw:type="curve" svg:x1="59.128cm" svg:y1="71.178cm" svg:x2="59.127cm" svg:y2="70.017cm" draw:start-shape="id43" draw:start-glue-point="0" draw:end-shape="id42" draw:end-glue-point="2" svg:d="M59128 71178c0-870-1-290-1-1161" svg:viewBox="0 0 2 1162">
          <text:p/>
        </draw:connector>
        <draw:connector draw:style-name="gr24" draw:text-style-name="P1" draw:layer="layout" draw:type="curve" svg:x1="62.828cm" svg:y1="70.018cm" svg:x2="62.829cm" svg:y2="71.179cm" draw:start-shape="id44" draw:start-glue-point="2" draw:end-shape="id45" draw:end-glue-point="0" svg:d="M62828 70018c0 871 1 291 1 1161" svg:viewBox="0 0 2 1162">
          <text:p/>
        </draw:connector>
        <draw:connector draw:style-name="gr8" draw:text-style-name="P1" draw:layer="layout" draw:type="curve" svg:x1="62.828cm" svg:y1="67.478cm" svg:x2="46.652cm" svg:y2="64.325cm" draw:start-shape="id44" draw:start-glue-point="0" draw:end-shape="id37" draw:end-glue-point="2" svg:d="M62828 67478c0-2364-16176-788-16176-3153" svg:viewBox="0 0 16177 3154">
          <text:p/>
        </draw:connector>
        <draw:custom-shape draw:style-name="gr5" draw:text-style-name="P18" xml:id="id46" draw:id="id46" draw:layer="layout" svg:width="3.048cm" svg:height="2.54cm" svg:x="99.895cm" svg:y="28.19cm">
          <text:p text:style-name="P7"><text:span text:style-name="T13">Abiah</text:span></text:p>
          <text:p text:style-name="P7"><text:span text:style-name="T4">1Ch 2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30.34cm" svg:y1="29.462cm" svg:x2="99.895cm" svg:y2="29.46cm" draw:start-shape="id16" draw:start-glue-point="1" draw:end-shape="id46" draw:end-glue-point="3" svg:d="M30340 29462c52167 0 17390-2 69555-2" svg:viewBox="0 0 69556 3">
          <text:p/>
        </draw:connector>
        <draw:custom-shape draw:style-name="gr4" draw:text-style-name="P5" xml:id="id47" draw:id="id47" draw:layer="layout" svg:width="3.048cm" svg:height="2.54cm" svg:x="99.893cm" svg:y="31.988cm">
          <text:p text:style-name="P4"><text:span text:style-name="T3">Ashur</text:span></text:p>
          <text:p text:style-name="P4"><text:span text:style-name="T4">1Ch 2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1" draw:layer="layout" draw:type="curve" svg:x1="101.417cm" svg:y1="31.988cm" svg:x2="101.419cm" svg:y2="30.73cm" draw:start-shape="id47" draw:start-glue-point="0" draw:end-shape="id46" draw:end-glue-point="2" svg:d="M101417 31988c0-942 2-313 2-1258" svg:viewBox="0 0 3 1259">
          <text:p/>
        </draw:connector>
        <draw:custom-shape draw:style-name="gr25" draw:text-style-name="P12" xml:id="id48" draw:id="id48" draw:layer="layout" svg:width="3.251cm" svg:height="2.591cm" svg:x="99.799cm" svg:y="36.63cm">
          <text:p text:style-name="P4"><text:span text:style-name="T3">Tekoa</text:span></text:p>
          <text:p text:style-name="P4"><text:span text:style-name="T4">1Ch 2:24, 4:5</text:span></text:p>
          <text:p text:style-name="P4"><text:span text:style-name="T4">2Ch 11:6, 20:20</text:span></text:p>
          <text:p text:style-name="P4"><text:span text:style-name="T4">Jer 6:1, Amo 1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101.424cm" svg:y1="36.63cm" svg:x2="101.417cm" svg:y2="34.528cm" draw:start-shape="id48" draw:start-glue-point="0" draw:end-shape="id47" draw:end-glue-point="2" svg:d="M101424 36630c0-1576-7-526-7-2102" svg:viewBox="0 0 8 2103">
          <text:p/>
        </draw:connector>
        <draw:custom-shape draw:style-name="gr5" draw:text-style-name="P18" xml:id="id49" draw:id="id49" draw:layer="layout" svg:width="3.048cm" svg:height="2.54cm" svg:x="103.996cm" svg:y="31.987cm">
          <text:p text:style-name="P7"><text:span text:style-name="T13">Naarah</text:span></text:p>
          <text:p text:style-name="P7"><text:span text:style-name="T4">1Ch 4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18" xml:id="id50" draw:id="id50" draw:layer="layout" svg:width="3.048cm" svg:height="2.54cm" svg:x="95.903cm" svg:y="31.989cm">
          <text:p text:style-name="P7"><text:span text:style-name="T13">Helah</text:span></text:p>
          <text:p text:style-name="P7"><text:span text:style-name="T4">1Ch 4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102.941cm" svg:y1="33.258cm" svg:x2="103.996cm" svg:y2="33.257cm" draw:start-shape="id47" draw:start-glue-point="1" draw:end-shape="id49" draw:end-glue-point="3" svg:d="M102941 33258c792 0 265-1 1055-1" svg:viewBox="0 0 1056 2">
          <text:p/>
        </draw:connector>
        <draw:connector draw:style-name="gr6" draw:text-style-name="P1" draw:layer="layout" draw:type="curve" svg:x1="98.951cm" svg:y1="33.259cm" svg:x2="99.893cm" svg:y2="33.258cm" draw:start-shape="id50" draw:start-glue-point="1" draw:end-shape="id47" draw:end-glue-point="3" svg:d="M98951 33259c708 0 237-1 942-1" svg:viewBox="0 0 943 2">
          <text:p/>
        </draw:connector>
        <draw:custom-shape draw:style-name="gr4" draw:text-style-name="P5" xml:id="id52" draw:id="id52" draw:layer="layout" svg:width="3.048cm" svg:height="2.54cm" svg:x="80.405cm" svg:y="36.601cm">
          <text:p text:style-name="P4"><text:span text:style-name="T3">Zereth</text:span></text:p>
          <text:p text:style-name="P4"><text:span text:style-name="T4">1Ch 4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53" draw:id="id53" draw:layer="layout" svg:width="3.048cm" svg:height="2.54cm" svg:x="84.406cm" svg:y="36.602cm">
          <text:p text:style-name="P4"><text:span text:style-name="T3">Jezoar</text:span></text:p>
          <text:p text:style-name="P4"><text:span text:style-name="T4">1Ch 4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51" draw:id="id51" draw:layer="layout" svg:width="3.048cm" svg:height="2.54cm" svg:x="88.207cm" svg:y="36.603cm">
          <text:p text:style-name="P4"><text:span text:style-name="T3">Ethnan</text:span></text:p>
          <text:p text:style-name="P4"><text:span text:style-name="T4">1Ch 4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1" draw:text-style-name="P1" draw:layer="layout" draw:type="curve" svg:x1="89.731cm" svg:y1="36.603cm" svg:x2="97.427cm" svg:y2="34.529cm" draw:start-shape="id51" draw:start-glue-point="0" draw:end-shape="id50" draw:end-glue-point="2" svg:d="M89731 36603c0-1554 7696-517 7696-2074" svg:viewBox="0 0 7697 2075">
          <text:p/>
        </draw:connector>
        <draw:connector draw:style-name="gr11" draw:text-style-name="P1" draw:layer="layout" draw:type="curve" svg:x1="81.929cm" svg:y1="36.601cm" svg:x2="97.427cm" svg:y2="34.529cm" draw:start-shape="id52" draw:start-glue-point="0" draw:end-shape="id50" draw:end-glue-point="2" svg:d="M81929 36601c0-1552 15498-517 15498-2072" svg:viewBox="0 0 15499 2073">
          <text:p/>
        </draw:connector>
        <draw:connector draw:style-name="gr11" draw:text-style-name="P1" draw:layer="layout" draw:type="curve" svg:x1="85.93cm" svg:y1="36.602cm" svg:x2="97.427cm" svg:y2="34.529cm" draw:start-shape="id53" draw:start-glue-point="0" draw:end-shape="id50" draw:end-glue-point="2" svg:d="M85930 36602c0-1554 11497-518 11497-2073" svg:viewBox="0 0 11498 2074">
          <text:p/>
        </draw:connector>
        <draw:connector draw:style-name="gr11" draw:text-style-name="P1" draw:layer="layout" draw:type="curve" svg:x1="105.52cm" svg:y1="36.602cm" svg:x2="105.52cm" svg:y2="34.527cm" draw:start-shape="id54" draw:start-glue-point="0" draw:end-shape="id49" draw:end-glue-point="2" svg:d="M105520 36602v-2075" svg:viewBox="0 0 1 2076">
          <text:p/>
        </draw:connector>
        <draw:connector draw:style-name="gr11" draw:text-style-name="P1" draw:layer="layout" draw:type="curve" svg:x1="109.321cm" svg:y1="36.603cm" svg:x2="105.52cm" svg:y2="34.527cm" draw:start-shape="id55" draw:start-glue-point="0" draw:end-shape="id49" draw:end-glue-point="2" svg:d="M109321 36603c0-1555-3801-518-3801-2076" svg:viewBox="0 0 3802 2077">
          <text:p/>
        </draw:connector>
        <draw:connector draw:style-name="gr11" draw:text-style-name="P1" draw:layer="layout" draw:type="curve" svg:x1="113.122cm" svg:y1="36.604cm" svg:x2="105.52cm" svg:y2="34.527cm" draw:start-shape="id56" draw:start-glue-point="0" draw:end-shape="id49" draw:end-glue-point="2" svg:d="M113122 36604c0-1557-7602-519-7602-2077" svg:viewBox="0 0 7603 2078">
          <text:p/>
        </draw:connector>
        <draw:connector draw:style-name="gr11" draw:text-style-name="P1" draw:layer="layout" draw:type="curve" svg:x1="117.048cm" svg:y1="36.605cm" svg:x2="105.52cm" svg:y2="34.527cm" draw:start-shape="id57" draw:start-glue-point="0" draw:end-shape="id49" draw:end-glue-point="2" svg:d="M117048 36605c0-1557-11528-518-11528-2078" svg:viewBox="0 0 11529 2079">
          <text:p/>
        </draw:connector>
        <draw:connector draw:style-name="gr8" draw:text-style-name="P1" draw:layer="layout" draw:type="curve" svg:x1="93.632cm" svg:y1="36.604cm" svg:x2="97.427cm" svg:y2="34.529cm" draw:start-shape="id58" draw:start-glue-point="0" draw:end-shape="id50" draw:end-glue-point="2" svg:d="M93632 36604c0-1555 3795-518 3795-2075" svg:viewBox="0 0 3796 2076">
          <text:p/>
        </draw:connector>
        <draw:custom-shape draw:style-name="gr4" draw:text-style-name="P5" xml:id="id54" draw:id="id54" draw:layer="layout" svg:width="3.048cm" svg:height="2.54cm" svg:x="103.996cm" svg:y="36.602cm">
          <text:p text:style-name="P4"><text:span text:style-name="T3">Ahuzam</text:span></text:p>
          <text:p text:style-name="P4"><text:span text:style-name="T4">1Ch 4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55" draw:id="id55" draw:layer="layout" svg:width="3.048cm" svg:height="2.54cm" svg:x="107.797cm" svg:y="36.603cm">
          <text:p text:style-name="P4"><text:span text:style-name="T3">Hepher</text:span></text:p>
          <text:p text:style-name="P4"><text:span text:style-name="T4">1Ch 4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56" draw:id="id56" draw:layer="layout" svg:width="3.048cm" svg:height="2.54cm" svg:x="111.598cm" svg:y="36.604cm">
          <text:p text:style-name="P4"><text:span text:style-name="T3">Temeni</text:span></text:p>
          <text:p text:style-name="P4"><text:span text:style-name="T4">1Ch 4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5" xml:id="id57" draw:id="id57" draw:layer="layout" svg:width="3.099cm" svg:height="2.54cm" svg:x="115.499cm" svg:y="36.605cm">
          <text:p text:style-name="P4"><text:span text:style-name="T3">Haahashtari</text:span></text:p>
          <text:p text:style-name="P4"><text:span text:style-name="T4">1Ch 4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58" draw:id="id58" draw:layer="layout" svg:width="3.048cm" svg:height="2.54cm" svg:x="92.108cm" svg:y="36.604cm">
          <text:p text:style-name="P4"><text:span text:style-name="T3">Coz</text:span></text:p>
          <text:p text:style-name="P4"><text:span text:style-name="T4">1Ch 4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61" draw:id="id61" draw:layer="layout" svg:width="3.048cm" svg:height="2.54cm" svg:x="88.109cm" svg:y="40.705cm">
          <text:p text:style-name="P4"><text:span text:style-name="T3">Anub</text:span></text:p>
          <text:p text:style-name="P4"><text:span text:style-name="T4">1Ch 4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62" draw:id="id62" draw:layer="layout" svg:width="3.048cm" svg:height="2.54cm" svg:x="92.11cm" svg:y="40.706cm">
          <text:p text:style-name="P4"><text:span text:style-name="T3">Zobebah</text:span></text:p>
          <text:p text:style-name="P4"><text:span text:style-name="T4">1Ch 4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60" draw:id="id60" draw:layer="layout" svg:width="3.048cm" svg:height="2.54cm" svg:x="96.011cm" svg:y="40.707cm">
          <text:p text:style-name="P4"><text:span text:style-name="T3">Harum</text:span></text:p>
          <text:p text:style-name="P4"><text:span text:style-name="T4">1Ch 4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97.536cm" svg:y1="44.408cm" svg:x2="97.535cm" svg:y2="43.247cm" draw:start-shape="id59" draw:start-glue-point="0" draw:end-shape="id60" draw:end-glue-point="2" svg:d="M97536 44408c0-870-1-290-1-1161" svg:viewBox="0 0 2 1162">
          <text:p/>
        </draw:connector>
        <draw:connector draw:style-name="gr8" draw:text-style-name="P1" draw:layer="layout" draw:type="curve" svg:x1="89.633cm" svg:y1="40.705cm" svg:x2="93.632cm" svg:y2="39.144cm" draw:start-shape="id61" draw:start-glue-point="0" draw:end-shape="id58" draw:end-glue-point="2" svg:d="M89633 40705c0-1170 3999-390 3999-1561" svg:viewBox="0 0 4000 1562">
          <text:p/>
        </draw:connector>
        <draw:connector draw:style-name="gr8" draw:text-style-name="P1" draw:layer="layout" draw:type="curve" svg:x1="93.634cm" svg:y1="40.706cm" svg:x2="93.632cm" svg:y2="39.144cm" draw:start-shape="id62" draw:start-glue-point="0" draw:end-shape="id58" draw:end-glue-point="2" svg:d="M93634 40706c0-1170-2-389-2-1562" svg:viewBox="0 0 3 1563">
          <text:p/>
        </draw:connector>
        <draw:connector draw:style-name="gr8" draw:text-style-name="P1" draw:layer="layout" draw:type="curve" svg:x1="97.535cm" svg:y1="40.707cm" svg:x2="93.632cm" svg:y2="39.144cm" draw:start-shape="id60" draw:start-glue-point="0" draw:end-shape="id58" draw:end-glue-point="2" svg:d="M97535 40707c0-1171-3903-390-3903-1563" svg:viewBox="0 0 3904 1564">
          <text:p/>
        </draw:connector>
        <draw:custom-shape draw:style-name="gr4" draw:text-style-name="P5" xml:id="id59" draw:id="id59" draw:layer="layout" svg:width="3.048cm" svg:height="2.54cm" svg:x="96.012cm" svg:y="44.408cm">
          <text:p text:style-name="P4"><text:span text:style-name="T3">Aharhel</text:span></text:p>
          <text:p text:style-name="P4"><text:span text:style-name="T4">1Ch 4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63" draw:id="id63" draw:layer="layout" svg:width="3.048cm" svg:height="2.54cm" svg:x="95.909cm" svg:y="36.605cm">
          <text:p text:style-name="P4"><text:span text:style-name="T3">Jabez</text:span></text:p>
          <text:p text:style-name="P4"><text:span text:style-name="T4">1Ch 4:9,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97.433cm" svg:y1="36.605cm" svg:x2="97.427cm" svg:y2="34.529cm" draw:start-shape="id63" draw:start-glue-point="0" draw:end-shape="id50" draw:end-glue-point="2" svg:d="M97433 36605c0-1555-6-518-6-2076" svg:viewBox="0 0 7 2077">
          <text:p/>
        </draw:connector>
        <draw:custom-shape draw:style-name="gr4" draw:text-style-name="P5" xml:id="id64" draw:id="id64" draw:layer="layout" svg:width="3.048cm" svg:height="2.54cm" svg:x="135.438cm" svg:y="9.817cm">
          <text:p text:style-name="P4"><text:span text:style-name="T3">Chelub</text:span></text:p>
          <text:p text:style-name="P4"><text:span text:style-name="T4">1Ch 4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27.086cm" svg:y1="11.083cm" svg:x2="135.438cm" svg:y2="11.087cm" draw:start-shape="id12" draw:start-glue-point="1" draw:end-shape="id64" draw:end-glue-point="3" svg:d="M127086 11083c6265 0 2090 4 8352 4" svg:viewBox="0 0 8353 5">
          <text:p/>
        </draw:connector>
        <draw:custom-shape draw:style-name="gr4" draw:text-style-name="P5" xml:id="id65" draw:id="id65" draw:layer="layout" svg:width="3.048cm" svg:height="2.54cm" svg:x="135.435cm" svg:y="12.89cm">
          <text:p text:style-name="P4"><text:span text:style-name="T3">Mehir</text:span></text:p>
          <text:p text:style-name="P4"><text:span text:style-name="T4">1Ch 4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36.959cm" svg:y1="12.89cm" svg:x2="136.962cm" svg:y2="12.357cm" draw:start-shape="id65" draw:start-glue-point="0" draw:end-shape="id64" draw:end-glue-point="2" svg:d="M136959 12890c0-399 3-133 3-533" svg:viewBox="0 0 4 534">
          <text:p/>
        </draw:connector>
        <draw:custom-shape draw:style-name="gr4" draw:text-style-name="P5" xml:id="id66" draw:id="id66" draw:layer="layout" svg:width="3.048cm" svg:height="2.54cm" svg:x="135.432cm" svg:y="15.913cm">
          <text:p text:style-name="P4"><text:span text:style-name="T3">Eshton</text:span></text:p>
          <text:p text:style-name="P4"><text:span text:style-name="T4">1Ch 4:11,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36.956cm" svg:y1="15.913cm" svg:x2="136.959cm" svg:y2="15.43cm" draw:start-shape="id66" draw:start-glue-point="0" draw:end-shape="id65" draw:end-glue-point="2" svg:d="M136956 15913c0-361 3-120 3-483" svg:viewBox="0 0 4 484">
          <text:p/>
        </draw:connector>
        <draw:custom-shape draw:style-name="gr13" draw:text-style-name="P9" xml:id="id68" draw:id="id68" draw:layer="layout" svg:width="3.048cm" svg:height="2.54cm" svg:x="131.326cm" svg:y="20.31cm">
          <text:p text:style-name="P4"><text:span text:style-name="T3">Beth-rapha</text:span></text:p>
          <text:p text:style-name="P4"><text:span text:style-name="T4">1Ch 4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67" draw:id="id67" draw:layer="layout" svg:width="3.048cm" svg:height="2.54cm" svg:x="135.454cm" svg:y="20.31cm">
          <text:p text:style-name="P4"><text:span text:style-name="T3">Paseah</text:span></text:p>
          <text:p text:style-name="P4"><text:span text:style-name="T4">1Ch 4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69" draw:id="id69" draw:layer="layout" svg:width="3.048cm" svg:height="2.54cm" svg:x="139.772cm" svg:y="20.31cm">
          <text:p text:style-name="P4"><text:span text:style-name="T3">Tehinnah</text:span></text:p>
          <text:p text:style-name="P4"><text:span text:style-name="T4">1Ch 4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2" xml:id="id70" draw:id="id70" draw:layer="layout" svg:width="3.048cm" svg:height="2.54cm" svg:x="139.776cm" svg:y="23.544cm">
          <text:p text:style-name="P4"><text:span text:style-name="T3">Ir-nahash</text:span></text:p>
          <text:p text:style-name="P4"><text:span text:style-name="T4">1Ch 4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36.978cm" svg:y1="20.31cm" svg:x2="136.956cm" svg:y2="18.453cm" draw:start-shape="id67" draw:start-glue-point="0" draw:end-shape="id66" draw:end-glue-point="2" svg:d="M136978 20310c0-1392-22-464-22-1857" svg:viewBox="0 0 23 1858">
          <text:p/>
        </draw:connector>
        <draw:connector draw:style-name="gr8" draw:text-style-name="P1" draw:layer="layout" draw:type="curve" svg:x1="132.85cm" svg:y1="20.31cm" svg:x2="136.956cm" svg:y2="18.453cm" draw:start-shape="id68" draw:start-glue-point="0" draw:end-shape="id66" draw:end-glue-point="2" svg:d="M132850 20310c0-1392 4106-464 4106-1857" svg:viewBox="0 0 4107 1858">
          <text:p/>
        </draw:connector>
        <draw:connector draw:style-name="gr8" draw:text-style-name="P1" draw:layer="layout" draw:type="curve" svg:x1="141.296cm" svg:y1="20.31cm" svg:x2="136.956cm" svg:y2="18.453cm" draw:start-shape="id69" draw:start-glue-point="0" draw:end-shape="id66" draw:end-glue-point="2" svg:d="M141296 20310c0-1392-4340-464-4340-1857" svg:viewBox="0 0 4341 1858">
          <text:p/>
        </draw:connector>
        <draw:connector draw:style-name="gr1" draw:text-style-name="P1" draw:layer="layout" draw:type="curve" svg:x1="141.296cm" svg:y1="22.85cm" svg:x2="141.3cm" svg:y2="23.544cm" draw:start-shape="id69" draw:start-glue-point="2" draw:end-shape="id70" draw:end-glue-point="0" svg:d="M141296 22850c0 522 4 175 4 694" svg:viewBox="0 0 5 695">
          <text:p/>
        </draw:connector>
        <draw:custom-shape draw:style-name="gr27" draw:text-style-name="P20" draw:layer="layout" svg:width="14.429cm" svg:height="16.792cm" svg:x="131.061cm" svg:y="9.49cm">
          <text:p text:style-name="P19"><text:span text:style-name="T14">The men of Rechah (H7397)</text:span></text:p>
          <text:p text:style-name="P19"><text:span text:style-name="T14">Jer 35:2,3,5,18 (Rechabit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11" xml:id="id71" draw:id="id71" draw:layer="layout" svg:width="3.048cm" svg:height="2.54cm" svg:x="18.087cm" svg:y="36.313cm">
          <text:p text:style-name="P10"><text:span text:style-name="T9">Othniel</text:span></text:p>
          <text:p text:style-name="P10"><text:span text:style-name="T10">1Ch 4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9.611cm" svg:y1="36.313cm" svg:x2="28.813cm" svg:y2="33.973cm" draw:start-shape="id71" draw:start-glue-point="0" draw:end-shape="id17" draw:end-glue-point="2" svg:d="M19611 36313c0-1753 9202-584 9202-2340" svg:viewBox="0 0 9203 2341">
          <text:p/>
        </draw:connector>
        <draw:custom-shape draw:style-name="gr29" draw:text-style-name="P11" xml:id="id76" draw:id="id76" draw:layer="layout" svg:width="3.048cm" svg:height="2.54cm" svg:x="18.088cm" svg:y="39.932cm">
          <text:p text:style-name="P10"><text:span text:style-name="T9">Hathath</text:span></text:p>
          <text:p text:style-name="P10"><text:span text:style-name="T10">1Ch 4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73" draw:id="id73" draw:layer="layout" svg:width="3.048cm" svg:height="2.54cm" svg:x="4.468cm" svg:y="59.228cm">
          <text:p text:style-name="P4"><text:span text:style-name="T3">Elah</text:span></text:p>
          <text:p text:style-name="P7"><text:span text:style-name="T4">1Ch 4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72" draw:id="id72" draw:layer="layout" svg:width="3.048cm" svg:height="2.54cm" svg:x="7.969cm" svg:y="59.229cm">
          <text:p text:style-name="P4"><text:span text:style-name="T3">Naam</text:span></text:p>
          <text:p text:style-name="P7"><text:span text:style-name="T4">1Ch 4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74" draw:id="id74" draw:layer="layout" svg:width="3.048cm" svg:height="2.54cm" svg:x="0.97cm" svg:y="59.23cm">
          <text:p text:style-name="P4"><text:span text:style-name="T3">Iru</text:span></text:p>
          <text:p text:style-name="P4"><text:span text:style-name="T4">1Ch 4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9.493cm" svg:y1="59.229cm" svg:x2="15.529cm" svg:y2="54.992cm" draw:start-shape="id72" draw:start-glue-point="0" draw:end-shape="id15" draw:end-glue-point="2" svg:d="M9493 59229c0-3177 6036-1059 6036-4237" svg:viewBox="0 0 6037 4238">
          <text:p/>
        </draw:connector>
        <draw:connector draw:style-name="gr8" draw:text-style-name="P1" draw:layer="layout" draw:type="curve" svg:x1="5.992cm" svg:y1="59.228cm" svg:x2="15.529cm" svg:y2="54.992cm" draw:start-shape="id73" draw:start-glue-point="0" draw:end-shape="id15" draw:end-glue-point="2" svg:d="M5992 59228c0-3175 9537-1058 9537-4236" svg:viewBox="0 0 9538 4237">
          <text:p/>
        </draw:connector>
        <draw:connector draw:style-name="gr8" draw:text-style-name="P1" draw:layer="layout" draw:type="curve" svg:x1="2.494cm" svg:y1="59.23cm" svg:x2="15.529cm" svg:y2="54.992cm" draw:start-shape="id74" draw:start-glue-point="0" draw:end-shape="id15" draw:end-glue-point="2" svg:d="M2494 59230c0-3177 13035-1058 13035-4238" svg:viewBox="0 0 13036 4239">
          <text:p/>
        </draw:connector>
        <draw:custom-shape draw:style-name="gr4" draw:text-style-name="P5" xml:id="id75" draw:id="id75" draw:layer="layout" svg:width="3.048cm" svg:height="2.54cm" svg:x="4.468cm" svg:y="62.273cm">
          <text:p text:style-name="P4"><text:span text:style-name="T3">Kenaz</text:span></text:p>
          <text:p text:style-name="P7"><text:span text:style-name="T4">1Ch 4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5.992cm" svg:y1="62.273cm" svg:x2="5.992cm" svg:y2="61.768cm" draw:start-shape="id75" draw:start-glue-point="0" draw:end-shape="id73" draw:end-glue-point="2" svg:d="M5992 62273v-505" svg:viewBox="0 0 1 506">
          <text:p/>
        </draw:connector>
        <draw:connector draw:style-name="gr8" draw:text-style-name="P1" draw:layer="layout" draw:type="curve" svg:x1="19.611cm" svg:y1="38.853cm" svg:x2="19.612cm" svg:y2="39.932cm" draw:start-shape="id71" draw:start-glue-point="2" draw:end-shape="id76" draw:end-glue-point="0" svg:d="M19611 38853c0 810 1 271 1 1079" svg:viewBox="0 0 2 1080">
          <text:p/>
        </draw:connector>
        <draw:custom-shape draw:style-name="gr4" draw:text-style-name="P5" xml:id="id77" draw:id="id77" draw:layer="layout" svg:width="3.048cm" svg:height="2.54cm" svg:x="34.041cm" svg:y="63.424cm">
          <text:p text:style-name="P4"><text:span text:style-name="T15">Salma</text:span></text:p>
          <text:p text:style-name="P4"><text:span text:style-name="T4">1Ch 2:5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12" xml:id="id1" draw:id="id1" draw:layer="layout" svg:width="4.521cm" svg:height="3.759cm" svg:x="33.307cm" svg:y="67.224cm">
          <text:p text:style-name="P4"><text:span text:style-name="T3">Beth-lehem</text:span></text:p>
          <text:p text:style-name="P4"><text:span text:style-name="T4">1Ch 2:51</text:span></text:p>
          <text:p text:style-name="P4"><text:span text:style-name="T7">Ephrath</text:span></text:p>
          <text:p text:style-name="P4"><text:span text:style-name="T4">Gen 35:19, 48:7</text:span></text:p>
          <text:p text:style-name="P4"><text:span text:style-name="T7">Beth-lehem-judah</text:span></text:p>
          <text:p text:style-name="P4"><text:span text:style-name="T4">Jdg 17:7,8,9, 19:1,2,18, Rth 1:1,2, 1Sa 17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35.567cm" svg:y1="67.224cm" svg:x2="35.565cm" svg:y2="65.964cm" draw:start-shape="id1" draw:start-glue-point="0" draw:end-shape="id77" draw:end-glue-point="2" svg:d="M35567 67224c0-945-2-315-2-1260" svg:viewBox="0 0 3 1261">
          <text:p/>
        </draw:connector>
        <draw:connector draw:style-name="gr8" draw:text-style-name="P1" draw:layer="layout" draw:type="curve" svg:x1="20.723cm" svg:y1="62.293cm" svg:x2="35.565cm" svg:y2="63.424cm" draw:start-shape="id18" draw:start-glue-point="2" draw:end-shape="id77" draw:end-glue-point="0" svg:d="M20723 62293c0 849 14842 284 14842 1131" svg:viewBox="0 0 14843 1132">
          <text:p/>
        </draw:connector>
        <draw:custom-shape draw:style-name="gr31" draw:text-style-name="P16" draw:layer="layout" svg:width="8.687cm" svg:height="2.828cm" svg:x="19.011cm" svg:y="55.377cm">
          <text:p text:style-name="P15"><text:span text:style-name="T12">Both Hur &amp; Salma are called</text:span></text:p>
          <text:p text:style-name="P15"><text:span text:style-name="T12">the father of Beth-lehe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11" xml:id="id78" draw:id="id78" draw:layer="layout" svg:width="3.048cm" svg:height="2.54cm" svg:x="27.288cm" svg:y="36.214cm">
          <text:p text:style-name="P10"><text:span text:style-name="T9">Jehaleleel</text:span></text:p>
          <text:p text:style-name="P10"><text:span text:style-name="T10">1Ch 4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8.813cm" svg:y1="33.973cm" svg:x2="28.812cm" svg:y2="36.214cm" draw:start-shape="id17" draw:start-glue-point="2" draw:end-shape="id78" draw:end-glue-point="0" svg:d="M28813 33973c0 1681-1 561-1 2241" svg:viewBox="0 0 2 2242">
          <text:p/>
        </draw:connector>
        <draw:custom-shape draw:style-name="gr4" draw:text-style-name="P5" xml:id="id79" draw:id="id79" draw:layer="layout" svg:width="3.048cm" svg:height="2.54cm" svg:x="25.594cm" svg:y="39.908cm">
          <text:p text:style-name="P4"><text:span text:style-name="T3">Ziphah</text:span></text:p>
          <text:p text:style-name="P7"><text:span text:style-name="T4">1Ch 4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2" draw:id="id82" draw:layer="layout" svg:width="3.048cm" svg:height="2.54cm" svg:x="29.095cm" svg:y="39.909cm">
          <text:p text:style-name="P4"><text:span text:style-name="T3">Tiria</text:span></text:p>
          <text:p text:style-name="P7"><text:span text:style-name="T4">1Ch 4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0" draw:id="id80" draw:layer="layout" svg:width="3.048cm" svg:height="2.54cm" svg:x="22.096cm" svg:y="39.91cm">
          <text:p text:style-name="P4"><text:span text:style-name="T3">Ziph</text:span></text:p>
          <text:p text:style-name="P4"><text:span text:style-name="T4">1Ch 4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1" draw:id="id81" draw:layer="layout" svg:width="3.048cm" svg:height="2.54cm" svg:x="32.696cm" svg:y="39.91cm">
          <text:p text:style-name="P4"><text:span text:style-name="T3">Asareel</text:span></text:p>
          <text:p text:style-name="P7"><text:span text:style-name="T4">1Ch 4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8.812cm" svg:y1="38.754cm" svg:x2="27.118cm" svg:y2="39.908cm" draw:start-shape="id78" draw:start-glue-point="2" draw:end-shape="id79" draw:end-glue-point="0" svg:d="M28812 38754c0 867-1694 290-1694 1154" svg:viewBox="0 0 1695 1155">
          <text:p/>
        </draw:connector>
        <draw:connector draw:style-name="gr8" draw:text-style-name="P1" draw:layer="layout" draw:type="curve" svg:x1="28.812cm" svg:y1="38.754cm" svg:x2="23.62cm" svg:y2="39.91cm" draw:start-shape="id78" draw:start-glue-point="2" draw:end-shape="id80" draw:end-glue-point="0" svg:d="M28812 38754c0 868-5192 291-5192 1156" svg:viewBox="0 0 5193 1157">
          <text:p/>
        </draw:connector>
        <draw:connector draw:style-name="gr8" draw:text-style-name="P1" draw:layer="layout" draw:type="curve" svg:x1="28.812cm" svg:y1="38.754cm" svg:x2="34.22cm" svg:y2="39.91cm" draw:start-shape="id78" draw:start-glue-point="2" draw:end-shape="id81" draw:end-glue-point="0" svg:d="M28812 38754c0 868 5408 291 5408 1156" svg:viewBox="0 0 5409 1157">
          <text:p/>
        </draw:connector>
        <draw:connector draw:style-name="gr8" draw:text-style-name="P1" draw:layer="layout" draw:type="curve" svg:x1="28.812cm" svg:y1="38.754cm" svg:x2="30.619cm" svg:y2="39.909cm" draw:start-shape="id78" draw:start-glue-point="2" draw:end-shape="id82" draw:end-glue-point="0" svg:d="M28812 38754c0 867 1807 290 1807 1155" svg:viewBox="0 0 1808 1156">
          <text:p/>
        </draw:connector>
        <draw:custom-shape draw:style-name="gr33" draw:text-style-name="P21" xml:id="id83" draw:id="id83" draw:layer="layout" svg:width="3.048cm" svg:height="2.54cm" svg:x="50.865cm" svg:y="36.291cm">
          <text:p text:style-name="P10"><text:span text:style-name="T9">Ezra</text:span></text:p>
          <text:p text:style-name="P10"><text:span text:style-name="T10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8.813cm" svg:y1="33.973cm" svg:x2="52.389cm" svg:y2="36.291cm" draw:start-shape="id17" draw:start-glue-point="2" draw:end-shape="id83" draw:end-glue-point="0" svg:d="M28813 33973c0 1740 23576 581 23576 2318" svg:viewBox="0 0 23577 2319">
          <text:p/>
        </draw:connector>
        <draw:custom-shape draw:style-name="gr4" draw:text-style-name="P5" xml:id="id84" draw:id="id84" draw:layer="layout" svg:width="3.048cm" svg:height="2.54cm" svg:x="40.371cm" svg:y="39.885cm">
          <text:p text:style-name="P4"><text:span text:style-name="T3">Mered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7" draw:id="id87" draw:layer="layout" svg:width="3.048cm" svg:height="2.54cm" svg:x="47.272cm" svg:y="39.886cm">
          <text:p text:style-name="P4"><text:span text:style-name="T3">Epher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5" draw:id="id85" draw:layer="layout" svg:width="3.048cm" svg:height="2.54cm" svg:x="36.873cm" svg:y="39.887cm">
          <text:p text:style-name="P4"><text:span text:style-name="T3">Jether</text:span></text:p>
          <text:p text:style-name="P4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86" draw:id="id86" draw:layer="layout" svg:width="3.048cm" svg:height="2.54cm" svg:x="50.873cm" svg:y="39.887cm">
          <text:p text:style-name="P4"><text:span text:style-name="T3">Jalon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52.389cm" svg:y1="38.831cm" svg:x2="41.895cm" svg:y2="39.885cm" draw:start-shape="id83" draw:start-glue-point="2" draw:end-shape="id84" draw:end-glue-point="0" svg:d="M52389 38831c0 792-10494 265-10494 1054" svg:viewBox="0 0 10495 1055">
          <text:p/>
        </draw:connector>
        <draw:connector draw:style-name="gr8" draw:text-style-name="P1" draw:layer="layout" draw:type="curve" svg:x1="52.389cm" svg:y1="38.831cm" svg:x2="38.397cm" svg:y2="39.887cm" draw:start-shape="id83" draw:start-glue-point="2" draw:end-shape="id85" draw:end-glue-point="0" svg:d="M52389 38831c0 793-13992 266-13992 1056" svg:viewBox="0 0 13993 1057">
          <text:p/>
        </draw:connector>
        <draw:connector draw:style-name="gr8" draw:text-style-name="P1" draw:layer="layout" draw:type="curve" svg:x1="52.389cm" svg:y1="38.831cm" svg:x2="52.397cm" svg:y2="39.887cm" draw:start-shape="id83" draw:start-glue-point="2" draw:end-shape="id86" draw:end-glue-point="0" svg:d="M52389 38831c0 793 8 266 8 1056" svg:viewBox="0 0 9 1057">
          <text:p/>
        </draw:connector>
        <draw:connector draw:style-name="gr8" draw:text-style-name="P1" draw:layer="layout" draw:type="curve" svg:x1="52.389cm" svg:y1="38.831cm" svg:x2="48.796cm" svg:y2="39.886cm" draw:start-shape="id83" draw:start-glue-point="2" draw:end-shape="id87" draw:end-glue-point="0" svg:d="M52389 38831c0 792-3593 265-3593 1055" svg:viewBox="0 0 3594 1056">
          <text:p/>
        </draw:connector>
        <draw:custom-shape draw:style-name="gr22" draw:text-style-name="P17" xml:id="id89" draw:id="id89" draw:layer="layout" svg:width="3.048cm" svg:height="2.54cm" svg:x="54.472cm" svg:y="39.886cm">
          <text:p text:style-name="P4"><text:span text:style-name="T3">Miriam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88" draw:id="id88" draw:layer="layout" svg:width="3.048cm" svg:height="2.54cm" svg:x="57.973cm" svg:y="39.887cm">
          <text:p text:style-name="P4"><text:span text:style-name="T3">Shammai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90" draw:id="id90" draw:layer="layout" svg:width="3.048cm" svg:height="2.54cm" svg:x="61.574cm" svg:y="39.888cm">
          <text:p text:style-name="P4"><text:span text:style-name="T3">Ishbah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52.389cm" svg:y1="38.831cm" svg:x2="59.497cm" svg:y2="39.887cm" draw:start-shape="id83" draw:start-glue-point="2" draw:end-shape="id88" draw:end-glue-point="0" svg:d="M52389 38831c0 793 7108 266 7108 1056" svg:viewBox="0 0 7109 1057">
          <text:p/>
        </draw:connector>
        <draw:connector draw:style-name="gr8" draw:text-style-name="P1" draw:layer="layout" draw:type="curve" svg:x1="52.389cm" svg:y1="38.831cm" svg:x2="55.996cm" svg:y2="39.886cm" draw:start-shape="id83" draw:start-glue-point="2" draw:end-shape="id89" draw:end-glue-point="0" svg:d="M52389 38831c0 792 3607 265 3607 1055" svg:viewBox="0 0 3608 1056">
          <text:p/>
        </draw:connector>
        <draw:connector draw:style-name="gr8" draw:text-style-name="P1" draw:layer="layout" draw:type="curve" svg:x1="52.389cm" svg:y1="38.831cm" svg:x2="63.098cm" svg:y2="39.888cm" draw:start-shape="id83" draw:start-glue-point="2" draw:end-shape="id90" draw:end-glue-point="0" svg:d="M52389 38831c0 793 10709 265 10709 1057" svg:viewBox="0 0 10710 1058">
          <text:p/>
        </draw:connector>
        <draw:connector draw:style-name="gr8" draw:text-style-name="P1" draw:layer="layout" draw:type="curve" svg:x1="63.099cm" svg:y1="43.289cm" svg:x2="63.098cm" svg:y2="42.428cm" draw:start-shape="id91" draw:start-glue-point="0" draw:end-shape="id90" draw:end-glue-point="2" svg:d="M63099 43289c0-645-1-215-1-861" svg:viewBox="0 0 2 862">
          <text:p/>
        </draw:connector>
        <draw:custom-shape draw:style-name="gr13" draw:text-style-name="P9" xml:id="id91" draw:id="id91" draw:layer="layout" svg:width="3.048cm" svg:height="2.54cm" svg:x="61.575cm" svg:y="43.289cm">
          <text:p text:style-name="P4"><text:span text:style-name="T3">Eshtemoa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xml:id="id92" draw:id="id92" draw:layer="layout" svg:width="3.048cm" svg:height="2.54cm" svg:x="65.775cm" svg:y="39.889cm">
          <text:p text:style-name="P4"><text:span text:style-name="T3">Jehudijah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65.775cm" svg:y1="41.159cm" svg:x2="64.622cm" svg:y2="41.158cm" draw:start-shape="id92" draw:start-glue-point="3" draw:end-shape="id90" draw:end-glue-point="1" svg:d="M65775 41159c-864 0-288-1-1153-1" svg:viewBox="0 0 1154 2">
          <text:p/>
        </draw:connector>
        <draw:custom-shape draw:style-name="gr13" draw:text-style-name="P9" xml:id="id95" draw:id="id95" draw:layer="layout" svg:width="3.048cm" svg:height="2.54cm" svg:x="65.775cm" svg:y="43.489cm">
          <text:p text:style-name="P4"><text:span text:style-name="T3">Jered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96" draw:id="id96" draw:layer="layout" svg:width="3.048cm" svg:height="2.54cm" svg:x="69.376cm" svg:y="43.49cm">
          <text:p text:style-name="P4"><text:span text:style-name="T3">Heber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97" draw:id="id97" draw:layer="layout" svg:width="3.048cm" svg:height="2.54cm" svg:x="72.877cm" svg:y="43.491cm">
          <text:p text:style-name="P4"><text:span text:style-name="T3">Jekuthiel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100" draw:id="id100" draw:layer="layout" svg:width="3.048cm" svg:height="2.54cm" svg:x="65.776cm" svg:y="47.09cm">
          <text:p text:style-name="P4"><text:span text:style-name="T3">Gedor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99" draw:id="id99" draw:layer="layout" svg:width="3.048cm" svg:height="2.54cm" svg:x="69.377cm" svg:y="47.091cm">
          <text:p text:style-name="P4"><text:span text:style-name="T3">Socho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98" draw:id="id98" draw:layer="layout" svg:width="3.048cm" svg:height="2.54cm" svg:x="72.878cm" svg:y="47.092cm">
          <text:p text:style-name="P4"><text:span text:style-name="T3">Zanoah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xml:id="id93" draw:id="id93" draw:layer="layout" svg:width="3.048cm" svg:height="2.54cm" svg:x="43.876cm" svg:y="39.883cm">
          <text:p text:style-name="P4"><text:span text:style-name="T3">Bithiah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43.876cm" svg:y1="41.153cm" svg:x2="43.419cm" svg:y2="41.155cm" draw:start-shape="id93" draw:start-glue-point="3" draw:end-shape="id84" draw:end-glue-point="1" svg:d="M43876 41153c-342 0-114 2-457 2" svg:viewBox="0 0 458 3">
          <text:p/>
        </draw:connector>
        <draw:custom-shape draw:style-name="gr13" draw:text-style-name="P9" xml:id="id94" draw:id="id94" draw:layer="layout" svg:width="3.048cm" svg:height="2.54cm" svg:x="43.877cm" svg:y="35.884cm">
          <text:p text:style-name="P4"><text:span text:style-name="T3">Pharaoh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45.401cm" svg:y1="38.424cm" svg:x2="45.4cm" svg:y2="39.883cm" draw:start-shape="id94" draw:start-glue-point="2" draw:end-shape="id93" draw:end-glue-point="0" svg:d="M45401 38424c0 1095-1 366-1 1459" svg:viewBox="0 0 2 1460">
          <text:p/>
        </draw:connector>
        <draw:custom-shape draw:style-name="gr34" draw:text-style-name="P23" draw:layer="layout" svg:width="3.647cm" svg:height="13.621cm" svg:x="17.833cm" svg:y="25.522cm">
          <text:p text:style-name="P22"><text:span text:style-name="T12">Othniel being called both the brother of (Jos 15:17) and the younger brother of (Jdg 1:13) of Caleb makes it seem like he was a sibling but he is only ever called the son of Kenaz (Jos 15:17, Jdg 1:13, 3:9,11, 1Ch 4:13) so the possibility remains that he could have been the son of one of Kenaz’s other s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1" draw:text-style-name="P1" draw:layer="layout" draw:type="curve" svg:x1="67.299cm" svg:y1="43.489cm" svg:x2="67.299cm" svg:y2="42.429cm" draw:start-shape="id95" draw:start-glue-point="0" draw:end-shape="id92" draw:end-glue-point="2" svg:d="M67299 43489v-1060" svg:viewBox="0 0 1 1061">
          <text:p/>
        </draw:connector>
        <draw:connector draw:style-name="gr11" draw:text-style-name="P1" draw:layer="layout" draw:type="curve" svg:x1="70.9cm" svg:y1="43.49cm" svg:x2="67.299cm" svg:y2="42.429cm" draw:start-shape="id96" draw:start-glue-point="0" draw:end-shape="id92" draw:end-glue-point="2" svg:d="M70900 43490c0-795-3601-265-3601-1061" svg:viewBox="0 0 3602 1062">
          <text:p/>
        </draw:connector>
        <draw:connector draw:style-name="gr11" draw:text-style-name="P1" draw:layer="layout" draw:type="curve" svg:x1="74.401cm" svg:y1="43.491cm" svg:x2="67.299cm" svg:y2="42.429cm" draw:start-shape="id97" draw:start-glue-point="0" draw:end-shape="id92" draw:end-glue-point="2" svg:d="M74401 43491c0-795-7102-264-7102-1062" svg:viewBox="0 0 7103 1063">
          <text:p/>
        </draw:connector>
        <draw:connector draw:style-name="gr24" draw:text-style-name="P1" draw:layer="layout" draw:type="curve" svg:x1="74.402cm" svg:y1="47.092cm" svg:x2="74.401cm" svg:y2="46.031cm" draw:start-shape="id98" draw:start-glue-point="0" draw:end-shape="id97" draw:end-glue-point="2" svg:d="M74402 47092c0-795-1-265-1-1061" svg:viewBox="0 0 2 1062">
          <text:p/>
        </draw:connector>
        <draw:connector draw:style-name="gr24" draw:text-style-name="P1" draw:layer="layout" draw:type="curve" svg:x1="70.901cm" svg:y1="47.091cm" svg:x2="70.9cm" svg:y2="46.03cm" draw:start-shape="id99" draw:start-glue-point="0" draw:end-shape="id96" draw:end-glue-point="2" svg:d="M70901 47091c0-795-1-265-1-1061" svg:viewBox="0 0 2 1062">
          <text:p/>
        </draw:connector>
        <draw:connector draw:style-name="gr24" draw:text-style-name="P1" draw:layer="layout" draw:type="curve" svg:x1="67.3cm" svg:y1="47.09cm" svg:x2="67.299cm" svg:y2="46.029cm" draw:start-shape="id100" draw:start-glue-point="0" draw:end-shape="id95" draw:end-glue-point="2" svg:d="M67300 47090c0-795-1-265-1-1061" svg:viewBox="0 0 2 106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BlackChancery" svg:font-family="BlackChancery" style:font-pitch="variable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Gabriela Nerd Font1" svg:font-family="'Gabriela Nerd Fon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7cm" fo:padding-bottom="0.127cm" fo:padding-left="0.127cm" fo:padding-right="0.127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Gabriela Nerd Font1" fo:font-family="'Gabriela Nerd Font'" style:font-style-name="Regular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25cm" draw:marker-start-width="0.229cm" draw:marker-end-width="0.2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Gabriela Nerd Font1" fo:font-family="'Gabriela Nerd Font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Gabriela Nerd Font1" fo:font-family="'Gabriela Nerd Font'" style:font-style-name="Regular" style:font-pitch="variable" fo:font-size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165.1cm" fo:page-height="101.6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9T07:30:44.577000000</meta:creation-date>
    <dc:date>2026-07-11T12:32:07.487469375</dc:date>
    <meta:editing-duration>P3DT6H6M46S</meta:editing-duration>
    <meta:editing-cycles>1400</meta:editing-cycles>
    <meta:generator>LibreOffice/26.2.4.2$Linux_X86_64 LibreOffice_project/64a984c51f4702dbd3710b13428c673a2f1292e7</meta:generator>
    <meta:print-date>2025-06-13T22:00:40.382818700</meta:print-date>
    <meta:printed-by>PDF files</meta:printed-by>
    <dc:title>1 Chronicles 4</dc:title>
    <meta:document-statistic meta:object-count="207"/>
  </office:meta>
</office:document-meta>
</file>