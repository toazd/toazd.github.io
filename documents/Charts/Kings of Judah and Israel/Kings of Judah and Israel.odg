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dp2" style:family="drawing-page">
      <style:drawing-page-properties draw:fill="solid" draw:fill-color="#ffffff"/>
    </style:style>
    <style:style style:name="gr1" style:family="graphic" style:parent-style-name="objectwithoutfill">
      <style:graphic-properties draw:stroke="dash" draw:stroke-dash="Dash" svg:stroke-width="0.106cm" svg:stroke-color="#ffb66c" draw:marker-start="" draw:marker-start-width="0.358cm" draw:marker-end="Arrowheads_20_4" draw:marker-end-width="0.458cm" svg:stroke-linecap="butt" draw:fill="none" draw:textarea-vertical-align="middle" fo:padding-top="0.177cm" fo:padding-bottom="0.177cm" fo:padding-left="0.302cm" fo:padding-right="0.302cm" loext:decorative="false"/>
    </style:style>
    <style:style style:name="gr2" style:family="graphic" style:parent-style-name="objectwithoutfill">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3"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4" style:family="graphic" style:parent-style-name="objectwithoutfill">
      <style:graphic-properties svg:stroke-width="0.106cm" svg:stroke-color="#ffb66c" draw:marker-start-width="0.358cm" draw:marker-end="Arrowheads_20_3" draw:marker-end-width="0.458cm" draw:fill="none" draw:textarea-vertical-align="middle" fo:padding-top="0.177cm" fo:padding-bottom="0.177cm" fo:padding-left="0.302cm" fo:padding-right="0.302cm" loext:decorative="false"/>
    </style:style>
    <style:style style:name="gr5" style:family="graphic" style:parent-style-name="objectwithoutfill">
      <style:graphic-properties svg:stroke-width="0.106cm" svg:stroke-color="#ea7500" draw:marker-start-width="0.358cm" draw:marker-end="Arrowheads_20_3" draw:marker-end-width="0.458cm" draw:fill="none" draw:textarea-vertical-align="middle" fo:padding-top="0.177cm" fo:padding-bottom="0.177cm" fo:padding-left="0.302cm" fo:padding-right="0.302cm" loext:decorative="false"/>
    </style:style>
    <style:style style:name="gr6" style:family="graphic" style:parent-style-name="objectwithoutfill">
      <style:graphic-properties draw:stroke="solid"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7"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8"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9" style:family="graphic" style:parent-style-name="objectwithoutfill">
      <style:graphic-properties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 draw:stroke-dash="Dash"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3" style:family="graphic" style:parent-style-name="objectwithoutfill">
      <style:graphic-properties draw:stroke="solid" draw:stroke-dash="Dash_20_Dot_20_4" svg:stroke-width="0.106cm" svg:stroke-color="#ea7500"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standard">
      <style:graphic-properties draw:stroke="dash" draw:stroke-dash="Dot" svg:stroke-width="0.106cm" svg:stroke-color="#c9211e" draw:marker-start-width="0.359cm" draw:marker-end-width="0.359cm" svg:stroke-linecap="butt" draw:fill="none" draw:textarea-vertical-align="middle" fo:padding-top="0.178cm" fo:padding-bottom="0.178cm" fo:padding-left="0.303cm" fo:padding-right="0.303cm" loext:decorative="false"/>
    </style:style>
    <style:style style:name="gr15" style:family="graphic" style:parent-style-name="objectwithoutfill">
      <style:graphic-properties draw:stroke="dash" draw:stroke-dash="Dash" svg:stroke-width="0.106cm" svg:stroke-color="#ffb66c"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17"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2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24"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1"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2"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3"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3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3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3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4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4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4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44"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5"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46"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2"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53"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5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5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79"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169cm" fo:min-width="2.405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ffd428" draw:marker-start-width="0.359cm" draw:marker-end-width="0.359cm" draw:fill="solid"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ffb66c"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16cm" fo:min-width="2.687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166cm" fo:min-width="2.297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892cm" fo:min-width="2.261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color="#000000" draw:fill="solid" draw:fill-color="#f7d1d5" draw:textarea-horizontal-align="justify" draw:textarea-vertical-align="middle" draw:auto-grow-height="false" fo:min-height="1.356cm" fo:min-width="2.503cm" style:writing-mode="lr-tb" loext:decorative="false"/>
      <style:paragraph-properties style:writing-mode="lr-tb"/>
    </style:style>
    <style:style style:name="gr8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8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9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cm" fo:min-width="2.261cm" fo:padding-top="0.178cm" fo:padding-bottom="0.178cm" fo:padding-left="0.303cm" fo:padding-right="0.303cm" style:writing-mode="lr-tb" loext:decorative="false"/>
      <style:paragraph-properties style:writing-mode="lr-tb"/>
    </style:style>
    <style:style style:name="gr9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2.323cm" fo:padding-top="0.178cm" fo:padding-bottom="0.178cm" fo:padding-left="0.303cm" fo:padding-right="0.303cm" style:writing-mode="lr-tb" loext:decorative="false"/>
      <style:paragraph-properties style:writing-mode="lr-tb"/>
    </style:style>
    <style:style style:name="gr9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93"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4"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5"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6" style:family="graphic" style:parent-style-name="standard" style:list-style-name="L1">
      <style:graphic-properties svg:stroke-width="0cm" svg:stroke-color="#000000" draw:marker-start-width="0.2cm" draw:marker-end-width="0.2cm" draw:fill-color="#f7d1d5" draw:textarea-horizontal-align="justify" draw:textarea-vertical-align="middle" draw:auto-grow-height="false" fo:min-height="1.356cm" fo:min-width="2.376cm" fo:padding-top="0.125cm" fo:padding-bottom="0.125cm" fo:padding-left="0.25cm" fo:padding-right="0.25cm" style:writing-mode="lr-tb" loext:decorative="false"/>
      <style:paragraph-properties style:writing-mode="lr-tb"/>
    </style:style>
    <style:style style:name="gr97"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9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708cm" fo:min-width="2.347cm" fo:padding-top="0.178cm" fo:padding-bottom="0.178cm" fo:padding-left="0.303cm" fo:padding-right="0.303cm" style:writing-mode="lr-tb" loext:decorative="false"/>
      <style:paragraph-properties style:writing-mode="lr-tb"/>
    </style:style>
    <style:style style:name="gr9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2.353cm" fo:padding-top="0.178cm" fo:padding-bottom="0.178cm" fo:padding-left="0.303cm" fo:padding-right="0.303cm" style:writing-mode="lr-tb" loext:decorative="false"/>
      <style:paragraph-properties style:writing-mode="lr-tb"/>
    </style:style>
    <style:style style:name="gr10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2.393cm" fo:padding-top="0.178cm" fo:padding-bottom="0.178cm" fo:padding-left="0.303cm" fo:padding-right="0.303cm" style:writing-mode="lr-tb" loext:decorative="false"/>
      <style:paragraph-properties style:writing-mode="lr-tb"/>
    </style:style>
    <style:style style:name="gr10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83cm" fo:min-width="2.317cm" fo:padding-top="0.178cm" fo:padding-bottom="0.178cm" fo:padding-left="0.303cm" fo:padding-right="0.303cm" style:writing-mode="lr-tb" loext:decorative="false"/>
      <style:paragraph-properties style:writing-mode="lr-tb"/>
    </style:style>
    <style:style style:name="gr10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13cm" fo:min-width="2.238cm" fo:padding-top="0.178cm" fo:padding-bottom="0.178cm" fo:padding-left="0.303cm" fo:padding-right="0.303cm" style:writing-mode="lr-tb" loext:decorative="false"/>
      <style:paragraph-properties style:writing-mode="lr-tb"/>
    </style:style>
    <style:style style:name="gr10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03cm" fo:min-width="2.313cm" fo:padding-top="0.178cm" fo:padding-bottom="0.178cm" fo:padding-left="0.303cm" fo:padding-right="0.303cm" style:writing-mode="lr-tb" loext:decorative="false"/>
      <style:paragraph-properties style:writing-mode="lr-tb"/>
    </style:style>
    <style:style style:name="gr10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06" style:family="graphic" style:parent-style-name="standard" style:list-style-name="L1">
      <style:graphic-properties svg:stroke-width="0cm" svg:stroke-color="#000000" draw:marker-start-width="0.2cm" draw:marker-end-width="0.2cm" draw:fill-color="#b4c7dc"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gr107"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8" style:family="graphic" style:parent-style-name="standard" style:list-style-name="L1">
      <style:graphic-properties svg:stroke-color="#000000" draw:fill-color="#f7d1d5" draw:textarea-horizontal-align="justify" draw:textarea-vertical-align="middle" draw:auto-grow-height="false" fo:min-height="1.356cm" fo:min-width="2.503cm" style:writing-mode="lr-tb" loext:decorative="false"/>
      <style:paragraph-properties style:writing-mode="lr-tb"/>
    </style:style>
    <style:style style:name="gr10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85cm" fo:padding-top="0.178cm" fo:padding-bottom="0.178cm" fo:padding-left="0.303cm" fo:padding-right="0.303cm" style:writing-mode="lr-tb" loext:decorative="false"/>
      <style:paragraph-properties style:writing-mode="lr-tb"/>
    </style:style>
    <style:style style:name="gr11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111"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11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351cm" fo:padding-top="0.178cm" fo:padding-bottom="0.178cm" fo:padding-left="0.303cm" fo:padding-right="0.303cm" style:writing-mode="lr-tb" loext:decorative="false"/>
      <style:paragraph-properties style:writing-mode="lr-tb"/>
    </style:style>
    <style:style style:name="gr11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638cm" fo:min-width="2.261cm" fo:padding-top="0.178cm" fo:padding-bottom="0.178cm" fo:padding-left="0.303cm" fo:padding-right="0.303cm" style:writing-mode="lr-tb" loext:decorative="false"/>
      <style:paragraph-properties style:writing-mode="lr-tb"/>
    </style:style>
    <style:style style:name="gr11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5" style:family="graphic" style:parent-style-name="standard" style:list-style-name="L1">
      <style:graphic-properties draw:fill="solid" draw:fill-color="#fff5ce" draw:textarea-horizontal-align="justify" draw:textarea-vertical-align="middle" draw:auto-grow-height="false" fo:min-height="1.398cm" fo:min-width="2.611cm" fo:wrap-option="wrap" style:writing-mode="lr-tb" loext:decorative="false"/>
      <style:paragraph-properties style:writing-mode="lr-tb"/>
    </style:style>
    <style:style style:name="gr116" style:family="graphic" style:parent-style-name="standard" style:list-style-name="L1">
      <style:graphic-properties svg:stroke-width="0.106cm" svg:stroke-color="#55308d" draw:marker-start-width="0.359cm" draw:marker-end-width="0.359cm" draw:fill-color="#b4c7dc" draw:textarea-horizontal-align="justify" draw:textarea-vertical-align="middle" draw:auto-grow-height="false" fo:min-height="2.511cm" fo:min-width="2.896cm" fo:padding-top="0.178cm" fo:padding-bottom="0.178cm" fo:padding-left="0.303cm" fo:padding-right="0.303cm" style:writing-mode="lr-tb" loext:decorative="false"/>
      <style:paragraph-properties style:writing-mode="lr-tb"/>
    </style:style>
    <style:style style:name="gr1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1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1" style:family="graphic" style:parent-style-name="standard" style:list-style-name="L1">
      <style:graphic-properties svg:stroke-width="0.106cm" svg:stroke-color="#ea7500" draw:marker-start-width="0.359cm" draw:marker-end-width="0.359cm" draw:fill="solid" draw:fill-color="#f7d1d5"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29"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478cm" fo:min-width="2.371cm" fo:padding-top="0.178cm" fo:padding-bottom="0.178cm" fo:padding-left="0.303cm" fo:padding-right="0.303cm" style:writing-mode="lr-tb" loext:decorative="false"/>
      <style:paragraph-properties style:writing-mode="lr-tb"/>
    </style:style>
    <style:style style:name="gr130"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2"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3"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4"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5"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6"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25cm" fo:min-width="2.397cm" fo:padding-top="0.178cm" fo:padding-bottom="0.178cm" fo:padding-left="0.303cm" fo:padding-right="0.303cm" style:writing-mode="lr-tb" loext:decorative="false"/>
      <style:paragraph-properties style:writing-mode="lr-tb"/>
    </style:style>
    <style:style style:name="gr13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25cm" fo:min-width="3.083cm" fo:padding-top="0.178cm" fo:padding-bottom="0.178cm" fo:padding-left="0.303cm" fo:padding-right="0.303cm" style:writing-mode="lr-tb" loext:decorative="false"/>
      <style:paragraph-properties style:writing-mode="lr-tb"/>
    </style:style>
    <style:style style:name="gr138" style:family="graphic" style:parent-style-name="standard" style:list-style-name="L1">
      <style:graphic-properties svg:stroke-width="0.106cm" svg:stroke-color="#55308d" draw:marker-start-width="0.359cm" draw:marker-end-width="0.359cm" draw:fill="solid" draw:fill-color="#cccccc" draw:textarea-horizontal-align="justify" draw:textarea-vertical-align="middle" draw:auto-grow-height="false" fo:min-height="2.854cm" fo:min-width="3.112cm" fo:padding-top="0.178cm" fo:padding-bottom="0.178cm" fo:padding-left="0.303cm" fo:padding-right="0.303cm" style:writing-mode="lr-tb" loext:decorative="false"/>
      <style:paragraph-properties style:writing-mode="lr-tb"/>
    </style:style>
    <style:style style:name="gr13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5cm" fo:min-width="2.367cm" fo:padding-top="0.178cm" fo:padding-bottom="0.178cm" fo:padding-left="0.303cm" fo:padding-right="0.303cm" style:writing-mode="lr-tb" loext:decorative="false"/>
      <style:paragraph-properties style:writing-mode="lr-tb"/>
    </style:style>
    <style:style style:name="gr14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4.875cm" fo:min-width="2.238cm" fo:padding-top="0.178cm" fo:padding-bottom="0.178cm" fo:padding-left="0.303cm" fo:padding-right="0.303cm" style:writing-mode="lr-tb" loext:decorative="false"/>
      <style:paragraph-properties style:writing-mode="lr-tb"/>
    </style:style>
    <style:style style:name="gr141" style:family="graphic" style:parent-style-name="standard" style:list-style-name="L1">
      <style:graphic-properties svg:stroke-width="0cm" svg:stroke-color="#000000" draw:marker-start-width="0.2cm" draw:marker-end-width="0.2cm" draw:fill="solid" draw:fill-color="#f7d1d5" draw:textarea-horizontal-align="justify" draw:textarea-vertical-align="middle" draw:auto-grow-height="false" fo:min-height="1.356cm" fo:min-width="2.503cm" fo:padding-top="0.125cm" fo:padding-bottom="0.125cm" fo:padding-left="0.25cm" fo:padding-right="0.25cm" style:writing-mode="lr-tb" loext:decorative="false"/>
      <style:paragraph-properties style:writing-mode="lr-tb"/>
    </style:style>
    <style:style style:name="P1" style:family="paragraph">
      <loext:graphic-properties draw:fill="none"/>
      <style:paragraph-properties fo:text-align="center"/>
      <style:text-properties style:font-name="Gabriela Nerd Font1" fo:font-size="12pt"/>
    </style:style>
    <style:style style:name="P2" style:family="paragraph">
      <style:paragraph-properties fo:margin-left="0cm" fo:margin-right="0cm" fo:margin-top="0cm" fo:margin-bottom="0cm" fo:line-height="100%" fo:text-align="center" fo:text-indent="0cm"/>
      <style:text-properties style:font-name="Gabriela Nerd Font1" fo:font-size="12pt"/>
    </style:style>
    <style:style style:name="P3"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style>
    <style:style style:name="P4" style:family="paragraph">
      <style:paragraph-properties fo:margin-left="0cm" fo:margin-right="0cm" fo:margin-top="0cm" fo:margin-bottom="0cm" fo:line-height="100%" fo:text-align="center" fo:text-indent="0cm"/>
      <style:text-properties style:font-name="Gabriela Nerd Font1" fo:font-size="12pt" style:text-underline-style="none" fo:font-weight="normal" style:font-weight-asian="normal" style:font-weight-complex="normal"/>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style:text-underline-style="none" fo:font-weight="normal" style:font-weight-asian="normal" style:font-weight-complex="normal"/>
    </style:style>
    <style:style style:name="P6" style:family="paragraph">
      <style:paragraph-properties fo:margin-left="0cm" fo:margin-right="0cm" fo:margin-top="0cm" fo:margin-bottom="0cm" fo:line-height="100%" fo:text-align="center" fo:text-indent="0cm"/>
      <style:text-properties style:font-name="Gabriela Nerd Font1" fo:font-size="12pt" fo:font-weight="normal" style:font-weight-asian="normal" style:font-weight-complex="normal"/>
    </style:style>
    <style:style style:name="P7"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normal" style:font-weight-asian="normal" style:font-weight-complex="normal"/>
    </style:style>
    <style:style style:name="P8" style:family="paragraph">
      <style:paragraph-properties fo:margin-left="0cm" fo:margin-right="0cm" fo:margin-top="0cm" fo:margin-bottom="0cm" fo:line-height="100%" fo:text-align="center" fo:text-indent="0cm"/>
      <style:text-properties fo:color="#000000" loext:opacity="100%" style:font-name="Gabriela Nerd Font1" fo:font-size="12pt" style:letter-kerning="true" style:font-name-asian="Microsoft YaHei" style:font-size-asian="18pt" style:font-name-complex="Arial" style:font-size-complex="18pt"/>
    </style:style>
    <style:style style:name="P9" style:family="paragraph">
      <loext:graphic-properties draw:fill="solid"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10" style:family="paragraph">
      <style:paragraph-properties fo:margin-left="0cm" fo:margin-right="0cm" fo:margin-top="0cm" fo:margin-bottom="0cm" fo:line-height="100%" fo:text-align="center" fo:text-indent="0cm"/>
      <style:text-properties style:text-position="0% 100%" style:font-name="Gabriela Nerd Font1" fo:font-size="12pt" style:text-underline-style="none" fo:font-weight="normal" style:font-weight-asian="normal" style:font-weight-complex="normal"/>
    </style:style>
    <style:style style:name="P11"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style:text-underline-style="none" fo:font-weight="normal" style:font-weight-asian="normal" style:font-weight-complex="normal"/>
    </style:style>
    <style:style style:name="P12"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13" style:family="paragraph">
      <style:paragraph-properties fo:margin-left="0cm" fo:margin-right="0cm" fo:margin-top="0cm" fo:margin-bottom="0cm" fo:line-height="100%" fo:text-align="center" fo:text-indent="0cm"/>
      <style:text-properties style:text-position="0% 100%" style:font-name="Gabriela Nerd Font1" fo:font-size="12pt" fo:font-weight="bold" style:font-weight-asian="bold" style:font-weight-complex="bold"/>
    </style:style>
    <style:style style:name="P14"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Gabriela Nerd Font1" fo:font-size="12pt" fo:font-weight="bold" style:font-weight-asian="bold" style:font-weight-complex="bold"/>
    </style:style>
    <style:style style:name="P15" style:family="paragraph">
      <style:paragraph-properties fo:margin-left="0cm" fo:margin-right="0cm" fo:margin-top="0cm" fo:margin-bottom="0cm" fo:line-height="100%" fo:text-align="center" fo:text-indent="0cm"/>
      <style:text-properties style:font-name="Gabriela Nerd Font1" fo:font-size="12pt" fo:font-weight="bold" style:font-weight-asian="bold" style:font-weight-complex="bold"/>
    </style:style>
    <style:style style:name="P16"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weight-asian="bold" style:font-weight-complex="bold"/>
    </style:style>
    <style:style style:name="P17" style:family="paragraph">
      <style:paragraph-properties fo:margin-left="0cm" fo:margin-right="0cm" fo:margin-top="0cm" fo:margin-bottom="0cm" fo:line-height="100%" fo:text-align="center" fo:text-indent="0cm"/>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8"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19" style:family="paragraph">
      <style:paragraph-properties fo:margin-left="0cm" fo:margin-right="0cm" fo:margin-top="0cm" fo:margin-bottom="0cm" fo:line-height="100%" fo:text-align="center" fo:text-indent="0cm"/>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1" style:family="paragraph">
      <style:paragraph-properties fo:margin-left="0cm" fo:margin-right="0cm" fo:margin-top="0cm" fo:margin-bottom="0cm" fo:line-height="100%" fo:text-align="center" fo:text-indent="0cm"/>
      <style:text-properties style:font-name="Gabriela Nerd Font1" fo:font-size="12pt" fo:font-weight="bold" style:font-size-asian="12pt" style:font-weight-asian="bold" style:font-size-complex="12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Gabriela Nerd Font1" fo:font-size="12pt" fo:font-weight="bold" style:font-size-asian="12pt" style:font-weight-asian="bold" style:font-size-complex="12pt" style:font-weight-complex="bold"/>
    </style:style>
    <style:style style:name="P23" style:family="paragraph">
      <loext:graphic-properties draw:fill-color="#f7d1d5"/>
      <style:paragraph-properties fo:margin-left="0cm" fo:margin-right="0cm" fo:margin-top="0cm" fo:margin-bottom="0cm" fo:line-height="100%" fo:text-align="center" fo:text-indent="0cm" style:writing-mode="lr-tb"/>
      <style:text-properties style:font-name="Gabriela Nerd Font1" fo:font-size="12pt"/>
    </style:style>
    <style:style style:name="P24" style:family="paragraph">
      <style:paragraph-properties fo:margin-left="0cm" fo:margin-right="0cm" fo:margin-top="0cm" fo:margin-bottom="0cm" fo:line-height="100%" fo:text-align="center" fo:text-indent="0cm"/>
      <style:text-properties style:font-name="Gabriela Nerd Font1" fo:font-size="12pt" style:font-size-asian="12pt" style:font-size-complex="12pt"/>
    </style:style>
    <style:style style:name="P25" style:family="paragraph">
      <loext:graphic-properties draw:fill="solid" draw:fill-color="#fff5ce"/>
      <style:paragraph-properties fo:margin-left="0cm" fo:margin-right="0cm" fo:margin-top="0cm" fo:margin-bottom="0cm" fo:line-height="100%" fo:text-align="center" fo:text-indent="0cm" style:writing-mode="lr-tb"/>
      <style:text-properties style:font-name="Gabriela Nerd Font1" fo:font-size="12pt" style:font-size-asian="12pt" style:font-size-complex="12pt"/>
    </style:style>
    <style:style style:name="P26" style:family="paragraph">
      <style:paragraph-properties fo:margin-left="0cm" fo:margin-right="0cm" fo:margin-top="0cm" fo:margin-bottom="0cm" fo:line-height="100%" fo:text-align="center" fo:text-indent="0cm"/>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7"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P28" style:family="paragraph">
      <style:paragraph-properties fo:margin-left="0cm" fo:margin-right="0cm" fo:margin-top="0cm" fo:margin-bottom="0cm" fo:line-height="100%" fo:text-align="center" fo:text-indent="0cm"/>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29"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fo:font-weight="normal" style:letter-kerning="true" style:font-name-asian="Microsoft YaHei" style:font-size-asian="18pt" style:font-weight-asian="normal" style:font-name-complex="Arial" style:font-size-complex="18pt" style:font-weight-complex="normal"/>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Gabriela Nerd Font1" fo:font-size="12pt" style:letter-kerning="true" style:font-name-asian="Microsoft YaHei" style:font-size-asian="18pt" style:font-name-complex="Arial" style:font-size-complex="18pt"/>
    </style:style>
    <style:style style:name="P31" style:family="paragraph">
      <loext:graphic-properties draw:fill="solid" draw:fill-color="#cccccc"/>
      <style:paragraph-properties fo:margin-left="0cm" fo:margin-right="0cm" fo:margin-top="0cm" fo:margin-bottom="0cm" fo:line-height="100%" fo:text-align="center" fo:text-indent="0cm" style:writing-mode="lr-tb"/>
      <style:text-properties style:font-name="Gabriela Nerd Font1" fo:font-size="12pt"/>
    </style:style>
    <style:style style:name="P32" style:family="paragraph">
      <style:paragraph-properties fo:margin-left="0cm" fo:margin-right="0cm" fo:margin-top="0cm" fo:margin-bottom="0cm" fo:line-height="100%" fo:text-align="center" fo:text-indent="0cm"/>
      <style:text-properties style:font-name="Gabriela Nerd Font1" fo:font-size="12pt" style:letter-kerning="true" style:font-name-asian="Microsoft YaHei" style:font-size-asian="18pt" style:font-name-complex="Arial" style:font-size-complex="18pt"/>
    </style:style>
    <style:style style:name="P33" style:family="paragraph">
      <loext:graphic-properties draw:fill="solid" draw:fill-color="#f7d1d5"/>
      <style:paragraph-properties fo:margin-left="0cm" fo:margin-right="0cm" fo:margin-top="0cm" fo:margin-bottom="0cm" fo:line-height="100%" fo:text-align="center" fo:text-indent="0cm" style:writing-mode="lr-tb"/>
      <style:text-properties style:font-name="Gabriela Nerd Font1" fo:font-size="12pt" style:letter-kerning="true" style:font-name-asian="Microsoft YaHei" style:font-size-asian="18pt" style:font-name-complex="Arial" style:font-size-complex="18pt"/>
    </style:style>
    <style:style style:name="T1" style:family="text">
      <style:text-properties style:font-name="Gabriela Nerd Font1" fo:font-size="12pt" style:text-underline-style="none" fo:font-weight="bold" style:font-size-asian="12pt" style:font-weight-asian="bold" style:font-size-complex="12pt" style:font-weight-complex="bold"/>
    </style:style>
    <style:style style:name="T2" style:family="text">
      <style:text-properties style:font-name="Gabriela Nerd Font1" fo:font-size="10pt" style:font-size-asian="10pt" style:font-size-complex="10pt"/>
    </style:style>
    <style:style style:name="T3" style:family="text">
      <style:text-properties style:font-name="Gabriela Nerd Font1" fo:font-size="10pt" style:text-underline-style="none" fo:font-weight="normal" style:font-size-asian="10pt" style:font-weight-asian="normal" style:font-size-complex="10pt" style:font-weight-complex="normal"/>
    </style:style>
    <style:style style:name="T4" style:family="text">
      <style:text-properties style:text-position="0% 100%" style:font-name="Gabriela Nerd Font1" fo:font-size="10pt" style:text-underline-style="none" fo:font-weight="normal" style:font-size-asian="10pt" style:font-weight-asian="normal" style:font-size-complex="10pt" style:font-weight-complex="normal"/>
    </style:style>
    <style:style style:name="T5" style:family="text">
      <style:text-properties style:text-position="0% 100%" style:font-name="Gabriela Nerd Font1" fo:font-size="10pt" fo:font-weight="normal" style:font-size-asian="10pt" style:font-weight-asian="normal" style:font-size-complex="10pt" style:font-weight-complex="normal"/>
    </style:style>
    <style:style style:name="T6" style:family="text">
      <style:text-properties fo:color="#000000" loext:opacity="100%"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7" style:family="text">
      <style:text-properties fo:color="#000000" loext:opacity="100%" style:font-name="Gabriela Nerd Font1" fo:font-size="10pt" style:letter-kerning="true" style:font-name-asian="Microsoft YaHei" style:font-size-asian="10pt" style:font-name-complex="Arial" style:font-size-complex="10pt"/>
    </style:style>
    <style:style style:name="T8" style:family="text">
      <style:text-properties fo:font-variant="normal" fo:text-transform="none" style:use-window-font-color="true" loext:opacity="0%" style:text-outline="false" style:text-line-through-style="none" style:text-line-through-type="none"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Gabriela Nerd Font1"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12" style:family="text">
      <style:text-properties style:text-position="0% 100%" style:font-name="Gabriela Nerd Font1" fo:font-size="12pt" style:text-underline-style="none" fo:font-weight="bold" style:font-size-asian="12pt" style:font-weight-asian="bold" style:font-size-complex="12pt" style:font-weight-complex="bold"/>
    </style:style>
    <style:style style:name="T13" style:family="text">
      <style:text-properties style:font-name="Gabriela Nerd Font1" fo:font-size="12pt" style:text-underline-style="none" fo:font-weight="bold" style:letter-kerning="true" style:font-name-asian="Microsoft YaHei" style:font-size-asian="18pt" style:font-weight-asian="bold" style:font-name-complex="Arial" style:font-size-complex="18pt" style:font-weight-complex="bold"/>
    </style:style>
    <style:style style:name="T14" style:family="text">
      <style:text-properties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font-name="Gabriela Nerd Font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6" style:family="text">
      <style:text-properties style:text-position="0% 100%" style:font-name="Gabriela Nerd Font1" fo:font-size="12pt" style:text-underline-style="none" fo:font-weight="bold" style:font-weight-asian="bold" style:font-weight-complex="bold"/>
    </style:style>
    <style:style style:name="T17" style:family="text">
      <style:text-properties style:font-name="Gabriela Nerd Font1" fo:font-size="12pt" style:text-underline-style="none" fo:font-weight="bold" style:font-weight-asian="bold" style:font-weight-complex="bold"/>
    </style:style>
    <style:style style:name="T18" style:family="text">
      <style:text-properties style:text-position="super 58%" style:font-name="Gabriela Nerd Font1" fo:font-size="12pt" style:text-underline-style="none" fo:font-weight="normal" style:font-size-asian="12pt" style:font-weight-asian="normal" style:font-size-complex="12pt" style:font-weight-complex="normal"/>
    </style:style>
    <style:style style:name="T19" style:family="text">
      <style:text-properties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0" style:family="text">
      <style:text-properties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1" style:family="text">
      <style:text-properties fo:color="#000000" loext:opacity="100%" style:font-name="Gabriela Nerd Font1" fo:font-size="10pt" style:text-underline-style="none" fo:font-weight="normal" style:letter-kerning="true" style:font-name-asian="Microsoft YaHei" style:font-size-asian="10pt" style:font-weight-asian="normal" style:font-name-complex="Arial" style:font-size-complex="10pt" style:font-weight-complex="normal"/>
    </style:style>
    <style:style style:name="T22" style:family="text">
      <style:text-properties fo:color="#000000" loext:opacity="100%" style:font-name="Gabriela Nerd Font1" fo:font-size="10pt" fo:font-weight="normal" style:letter-kerning="true" style:font-name-asian="Microsoft YaHei" style:font-size-asian="10pt" style:font-weight-asian="normal" style:font-name-complex="Arial" style:font-size-complex="10pt" style:font-weight-complex="normal"/>
    </style:style>
    <style:style style:name="T23" style:family="text">
      <style:text-properties fo:color="#000000" loext:opacity="100%"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4" style:family="text">
      <style:text-properties style:text-position="0% 100%" style:font-name="Gabriela Nerd Font1" fo:font-size="12pt" fo:font-weight="bold" style:font-size-asian="12pt" style:font-weight-asian="bold" style:font-size-complex="12pt" style:font-weight-complex="bold"/>
    </style:style>
    <style:style style:name="T25" style:family="text">
      <style:text-properties fo:color="#000000" loext:opacity="100%" style:font-name="Gabriela Nerd Font1" fo:font-size="12pt" style:text-underline-style="none" fo:font-weight="bold" style:letter-kerning="true" style:font-name-asian="Microsoft YaHei" style:font-size-asian="10pt" style:font-weight-asian="bold" style:font-name-complex="Arial" style:font-size-complex="10pt" style:font-weight-complex="bold"/>
    </style:style>
    <style:style style:name="T26" style:family="text">
      <style:text-properties fo:font-variant="normal" fo:text-transform="none" style:use-window-font-color="true" loext:opacity="0%" style:text-outline="false" style:text-line-through-style="none" style:text-line-through-type="none" style:text-position="0% 100%" style:font-name="Gabriela Nerd Font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7" style:family="text">
      <style:text-properties style:font-name="Gabriela Nerd Font1" fo:font-size="12pt"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Gabriela Nerd Font1" fo:font-size="10pt" style:letter-kerning="true" style:font-name-asian="Microsoft YaHei" style:font-size-asian="10pt" style:font-name-complex="Arial"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svg:x1="13.695cm" svg:y1="78.292cm" svg:x2="10.769cm" svg:y2="85.692cm" draw:start-shape="id1" draw:start-glue-point="2" draw:end-shape="id2" draw:end-glue-point="14" svg:d="M13695 78292c0 4934-975 7400-2926 7400" svg:viewBox="0 0 2927 7401">
          <text:p/>
        </draw:connector>
        <draw:connector draw:style-name="gr1" draw:text-style-name="P1" draw:layer="layout" draw:type="curve" svg:x1="11.326cm" svg:y1="83.404cm" svg:x2="10.768cm" svg:y2="85.288cm" draw:start-shape="id3" draw:start-glue-point="6" draw:end-shape="id2" draw:end-glue-point="13" svg:d="M11326 83404c0 1256-186 1884-558 1884" svg:viewBox="0 0 559 1885">
          <text:p/>
        </draw:connector>
        <draw:connector draw:style-name="gr1" draw:text-style-name="P1" draw:layer="layout" draw:type="curve" svg:x1="14.24cm" svg:y1="84.96cm" svg:x2="10.769cm" svg:y2="85.692cm" draw:start-shape="id4" draw:start-glue-point="9" draw:end-shape="id2" draw:end-glue-point="14" svg:d="M14240 84960c-2602 0-867 732-3471 732" svg:viewBox="0 0 3472 733">
          <text:p/>
        </draw:connector>
        <draw:connector draw:style-name="gr2" draw:text-style-name="P1" draw:layer="layout" draw:type="curve" draw:line-skew="0.761cm" svg:x1="20.728cm" svg:y1="38.37cm" svg:x2="10.986cm" svg:y2="43.784cm" draw:start-shape="id5" draw:start-glue-point="0" draw:end-shape="id6" draw:end-glue-point="8" svg:d="M20728 38370c0 5242-9742 2536-9742 5414" svg:viewBox="0 0 9743 5415">
          <text:p/>
        </draw:connector>
        <draw:connector draw:style-name="gr2" draw:text-style-name="P1" draw:layer="layout" draw:type="curve" svg:x1="20.728cm" svg:y1="38.37cm" svg:x2="20.7cm" svg:y2="41.663cm" draw:start-shape="id5" draw:start-glue-point="0" draw:end-shape="id7" draw:end-glue-point="0" svg:d="M20728 38370c0 2511-28 865-28 3293" svg:viewBox="0 0 29 3294">
          <text:p/>
        </draw:connector>
        <draw:connector draw:style-name="gr2" draw:text-style-name="P1" draw:layer="layout" draw:type="curve" svg:x1="20.728cm" svg:y1="38.37cm" svg:x2="24.028cm" svg:y2="41.791cm" draw:start-shape="id5" draw:start-glue-point="0" draw:end-shape="id8" draw:end-glue-point="4" svg:d="M20728 38370c0 2605 3300 895 3300 3421" svg:viewBox="0 0 3301 3422">
          <text:p/>
        </draw:connector>
        <draw:connector draw:style-name="gr2" draw:text-style-name="P1" draw:layer="layout" draw:type="curve" svg:x1="22.663cm" svg:y1="36.001cm" svg:x2="22.663cm" svg:y2="37.481cm" draw:start-shape="id9" draw:start-glue-point="2" draw:end-shape="id10" draw:end-glue-point="0" svg:d="M22663 36001v1480" svg:viewBox="0 0 1 1481">
          <text:p/>
        </draw:connector>
        <draw:connector draw:style-name="gr2" draw:text-style-name="P1" draw:layer="layout" draw:type="curve" svg:x1="26.403cm" svg:y1="37.482cm" svg:x2="22.663cm" svg:y2="36.001cm" draw:start-shape="id11" draw:start-glue-point="0" draw:end-shape="id9" draw:end-glue-point="2" svg:d="M26403 37482c0-357-935-714-1870-714s-1870-384-1870-767" svg:viewBox="0 0 3741 1482">
          <text:p/>
        </draw:connector>
        <draw:connector draw:style-name="gr3" draw:text-style-name="P1" draw:layer="layout" draw:type="curve" svg:x1="20.708cm" svg:y1="70.044cm" svg:x2="20.708cm" svg:y2="71.598cm" draw:start-shape="id12" draw:start-glue-point="2" draw:end-shape="id13" draw:end-glue-point="0" svg:d="M20708 70044v1554" svg:viewBox="0 0 1 1555">
          <text:p/>
        </draw:connector>
        <draw:connector draw:style-name="gr3" draw:text-style-name="P1" draw:layer="layout" draw:type="curve" svg:x1="20.708cm" svg:y1="73.376cm" svg:x2="20.709cm" svg:y2="75.001cm" draw:start-shape="id13" draw:start-glue-point="2" draw:end-shape="id14" draw:end-glue-point="0" svg:d="M20708 73376c0 1219 1 407 1 1625" svg:viewBox="0 0 2 1626">
          <text:p/>
        </draw:connector>
        <draw:connector draw:style-name="gr2" draw:text-style-name="P1" draw:layer="layout" draw:type="curve" svg:x1="22.661cm" svg:y1="27.302cm" svg:x2="22.661cm" svg:y2="28.184cm" draw:start-shape="id15" draw:start-glue-point="2" draw:end-shape="id16" draw:end-glue-point="0" svg:d="M22661 27302v882" svg:viewBox="0 0 1 883">
          <text:p/>
        </draw:connector>
        <draw:connector draw:style-name="gr4" draw:text-style-name="P1" draw:layer="layout" draw:type="line" svg:x1="9.039cm" svg:y1="16.33cm" svg:x2="9.04cm" svg:y2="17.154cm" draw:start-shape="id17" draw:start-glue-point="2" draw:end-shape="id18" draw:end-glue-point="0" svg:d="M9039 16330l1 824" svg:viewBox="0 0 2 825">
          <text:p/>
        </draw:connector>
        <draw:connector draw:style-name="gr5" draw:text-style-name="P1" draw:layer="layout" draw:type="curve" svg:x1="10.56cm" svg:y1="10.393cm" svg:x2="10.547cm" svg:y2="14.198cm" draw:start-shape="id19" draw:start-glue-point="9" draw:end-shape="id17" draw:end-glue-point="10" svg:d="M10560 10393c930 0 936 3805-13 3805" svg:viewBox="0 0 712 3806">
          <text:p/>
        </draw:connector>
        <draw:connector draw:style-name="gr6" draw:text-style-name="P1" draw:layer="layout" draw:type="curve" svg:x1="21.963cm" svg:y1="24.804cm" svg:x2="21.963cm" svg:y2="25.524cm" draw:start-shape="id20" draw:start-glue-point="6" draw:end-shape="id15" draw:end-glue-point="4" svg:d="M21963 24804v720" svg:viewBox="0 0 1 721">
          <text:p/>
        </draw:connector>
        <draw:connector draw:style-name="gr5" draw:text-style-name="P1" draw:layer="layout" draw:type="curve" svg:x1="9.054cm" svg:y1="43.028cm" svg:x2="9.05cm" svg:y2="43.784cm" draw:start-shape="id21" draw:start-glue-point="6" draw:end-shape="id6" draw:end-glue-point="4" svg:d="M9054 43028c0 568-4 191-4 756" svg:viewBox="0 0 5 757">
          <text:p/>
        </draw:connector>
        <draw:connector draw:style-name="gr2" draw:text-style-name="P1" draw:layer="layout" draw:type="curve" svg:x1="7.164cm" svg:y1="72.628cm" svg:x2="7.172cm" svg:y2="75.701cm" draw:start-shape="id22" draw:start-glue-point="0" draw:end-shape="id23" draw:end-glue-point="0" svg:d="M7164 72628c0 2346 8 810 8 3073" svg:viewBox="0 0 9 3074">
          <text:p/>
        </draw:connector>
        <draw:connector draw:style-name="gr2" draw:text-style-name="P1" draw:layer="layout" draw:type="curve" draw:line-skew="0.289cm" svg:x1="3.472cm" svg:y1="75.701cm" svg:x2="7.164cm" svg:y2="72.628cm" draw:start-shape="id24" draw:start-glue-point="0" draw:end-shape="id22" draw:end-glue-point="0" svg:d="M3472 75701c0-1831 3692-295 3692-3073" svg:viewBox="0 0 3693 3074">
          <text:p/>
        </draw:connector>
        <draw:connector draw:style-name="gr7" draw:text-style-name="P1" xml:id="id22" draw:id="id22" draw:layer="layout" draw:type="curve" svg:x1="7.462cm" svg:y1="72.629cm" svg:x2="6.944cm" svg:y2="72.627cm" draw:start-shape="id25" draw:start-glue-point="5" draw:end-shape="id26" draw:end-glue-point="7" svg:d="M7462 72629c-427 0-169-2-518-2" svg:viewBox="0 0 519 3">
          <text:p/>
        </draw:connector>
        <draw:connector draw:style-name="gr2" draw:text-style-name="P1" draw:layer="layout" draw:type="curve" draw:line-skew="0.374cm" svg:x1="10.972cm" svg:y1="72.628cm" svg:x2="13.695cm" svg:y2="75.701cm" draw:start-shape="id27" draw:start-glue-point="0" draw:end-shape="id1" draw:end-glue-point="0" svg:d="M10972 72628c0 2905 2723 1369 2723 3073" svg:viewBox="0 0 2724 3074">
          <text:p/>
        </draw:connector>
        <draw:connector draw:style-name="gr7" draw:text-style-name="P1" xml:id="id27" draw:id="id27" draw:layer="layout" draw:type="curve" svg:x1="10.637cm" svg:y1="72.629cm" svg:x2="11.229cm" svg:y2="72.628cm" draw:start-shape="id25" draw:start-glue-point="7" draw:end-shape="id28" draw:end-glue-point="5" svg:d="M10637 72629c483 0 187-1 592-1" svg:viewBox="0 0 593 2">
          <text:p/>
        </draw:connector>
        <draw:connector draw:style-name="gr4" draw:text-style-name="P1" draw:layer="layout" draw:type="curve" svg:x1="12.952cm" svg:y1="6.847cm" svg:x2="10.617cm" svg:y2="9.33cm" draw:start-shape="id29" draw:start-glue-point="2" draw:end-shape="id19" draw:end-glue-point="8" svg:d="M12952 6847c0 1656-778 2483-2335 2483" svg:viewBox="0 0 2336 2484">
          <text:p/>
        </draw:connector>
        <draw:connector draw:style-name="gr8" draw:text-style-name="P1" draw:layer="layout" draw:type="curve" svg:x1="23.139cm" svg:y1="42.68cm" svg:x2="22.288cm" svg:y2="42.679cm" draw:start-shape="id8" draw:start-glue-point="5" draw:end-shape="id7" draw:end-glue-point="7" svg:d="M23139 42680c-639 0-214-1-851-1" svg:viewBox="0 0 852 2">
          <text:p/>
        </draw:connector>
        <draw:connector draw:style-name="gr8" draw:text-style-name="P1" draw:layer="layout" draw:type="curve" svg:x1="20.004cm" svg:y1="62.031cm" svg:x2="20.006cm" svg:y2="62.754cm" draw:start-shape="id30" draw:start-glue-point="6" draw:end-shape="id31" draw:end-glue-point="4" svg:d="M20004 62031c0 543 2 182 2 723" svg:viewBox="0 0 3 724">
          <text:p/>
        </draw:connector>
        <draw:connector draw:style-name="gr8" draw:text-style-name="P1" draw:layer="layout" draw:type="curve" svg:x1="20.001cm" svg:y1="46.497cm" svg:x2="20.001cm" svg:y2="47.569cm" draw:start-shape="id32" draw:start-glue-point="6" draw:end-shape="id33" draw:end-glue-point="4" svg:d="M20001 46497v1072" svg:viewBox="0 0 1 1073">
          <text:p/>
        </draw:connector>
        <draw:connector draw:style-name="gr8" draw:text-style-name="P1" draw:layer="layout" draw:type="curve" svg:x1="20.001cm" svg:y1="49.347cm" svg:x2="19.998cm" svg:y2="50.358cm" draw:start-shape="id33" draw:start-glue-point="6" draw:end-shape="id34" draw:end-glue-point="9" svg:d="M20001 49347c0 759-3 254-3 1011" svg:viewBox="0 0 4 1012">
          <text:p/>
        </draw:connector>
        <draw:connector draw:style-name="gr8" draw:text-style-name="P1" draw:layer="layout" draw:type="curve" svg:x1="20.128cm" svg:y1="52.39cm" svg:x2="20.129cm" svg:y2="53.007cm" draw:start-shape="id34" draw:start-glue-point="6" draw:end-shape="id35" draw:end-glue-point="9" svg:d="M20128 52390c0 463 1 155 1 617" svg:viewBox="0 0 2 618">
          <text:p/>
        </draw:connector>
        <draw:connector draw:style-name="gr8" draw:text-style-name="P1" draw:layer="layout" draw:type="curve" svg:x1="20.005cm" svg:y1="54.785cm" svg:x2="20.004cm" svg:y2="55.437cm" draw:start-shape="id35" draw:start-glue-point="6" draw:end-shape="id36" draw:end-glue-point="4" svg:d="M20005 54785c0 490-1 165-1 652" svg:viewBox="0 0 2 653">
          <text:p/>
        </draw:connector>
        <draw:connector draw:style-name="gr8" draw:text-style-name="P1" draw:layer="layout" draw:type="curve" svg:x1="20.009cm" svg:y1="67.133cm" svg:x2="20.01cm" svg:y2="68.266cm" draw:start-shape="id37" draw:start-glue-point="6" draw:end-shape="id12" draw:end-glue-point="4" svg:d="M20009 67133c0 850 1 284 1 1133" svg:viewBox="0 0 2 1134">
          <text:p/>
        </draw:connector>
        <draw:connector draw:style-name="gr8" draw:text-style-name="P1" draw:layer="layout" draw:type="curve" svg:x1="20.006cm" svg:y1="64.532cm" svg:x2="20.009cm" svg:y2="65.355cm" draw:start-shape="id31" draw:start-glue-point="6" draw:end-shape="id37" draw:end-glue-point="4" svg:d="M20006 64532c0 618 3 207 3 823" svg:viewBox="0 0 4 824">
          <text:p/>
        </draw:connector>
        <draw:connector draw:style-name="gr2" draw:text-style-name="P1" draw:layer="layout" draw:type="curve" svg:x1="20.702cm" svg:y1="62.031cm" svg:x2="20.704cm" svg:y2="62.754cm" draw:start-shape="id30" draw:start-glue-point="2" draw:end-shape="id31" draw:end-glue-point="0" svg:d="M20702 62031c0 543 2 182 2 723" svg:viewBox="0 0 3 724">
          <text:p/>
        </draw:connector>
        <draw:connector draw:style-name="gr8" draw:text-style-name="P1" draw:layer="layout" draw:type="curve" svg:x1="20.004cm" svg:y1="59.616cm" svg:x2="20.004cm" svg:y2="60.253cm" draw:start-shape="id38" draw:start-glue-point="6" draw:end-shape="id30" draw:end-glue-point="4" svg:d="M20004 59616v637" svg:viewBox="0 0 1 638">
          <text:p/>
        </draw:connector>
        <draw:connector draw:style-name="gr8" draw:text-style-name="P1" draw:layer="layout" draw:type="curve" svg:x1="20.004cm" svg:y1="57.215cm" svg:x2="20.004cm" svg:y2="57.838cm" draw:start-shape="id36" draw:start-glue-point="6" draw:end-shape="id38" draw:end-glue-point="4" svg:d="M20004 57215v623" svg:viewBox="0 0 1 624">
          <text:p/>
        </draw:connector>
        <draw:connector draw:style-name="gr2" draw:text-style-name="P1" draw:layer="layout" draw:type="curve" svg:x1="20.703cm" svg:y1="54.785cm" svg:x2="20.702cm" svg:y2="55.437cm" draw:start-shape="id35" draw:start-glue-point="2" draw:end-shape="id36" draw:end-glue-point="0" svg:d="M20703 54785c0 490-1 165-1 652" svg:viewBox="0 0 2 653">
          <text:p/>
        </draw:connector>
        <draw:connector draw:style-name="gr2" draw:text-style-name="P1" draw:layer="layout" draw:type="curve" svg:x1="20.699cm" svg:y1="52.39cm" svg:x2="20.703cm" svg:y2="53.007cm" draw:start-shape="id34" draw:start-glue-point="2" draw:end-shape="id35" draw:end-glue-point="0" svg:d="M20699 52390c0 463 4 155 4 617" svg:viewBox="0 0 5 618">
          <text:p/>
        </draw:connector>
        <draw:connector draw:style-name="gr2" draw:text-style-name="P1" draw:layer="layout" draw:type="curve" svg:x1="20.699cm" svg:y1="49.347cm" svg:x2="20.699cm" svg:y2="50.358cm" draw:start-shape="id33" draw:start-glue-point="2" draw:end-shape="id34" draw:end-glue-point="0" svg:d="M20699 49347v1011" svg:viewBox="0 0 1 1012">
          <text:p/>
        </draw:connector>
        <draw:connector draw:style-name="gr2" draw:text-style-name="P1" draw:layer="layout" draw:type="curve" svg:x1="20.699cm" svg:y1="46.497cm" svg:x2="20.699cm" svg:y2="47.569cm" draw:start-shape="id32" draw:start-glue-point="2" draw:end-shape="id33" draw:end-glue-point="0" svg:d="M20699 46497v1072" svg:viewBox="0 0 1 1073">
          <text:p/>
        </draw:connector>
        <draw:connector draw:style-name="gr8" draw:text-style-name="P1" draw:layer="layout" draw:type="curve" svg:x1="20.7cm" svg:y1="43.695cm" svg:x2="20.699cm" svg:y2="44.719cm" draw:start-shape="id7" draw:start-glue-point="2" draw:end-shape="id32" draw:end-glue-point="0" svg:d="M20700 43695c0 769-1 258-1 1024" svg:viewBox="0 0 2 1025">
          <text:p/>
        </draw:connector>
        <draw:connector draw:style-name="gr9" draw:text-style-name="P1" draw:layer="layout" draw:type="curve" svg:x1="25.421cm" svg:y1="35.115cm" svg:x2="24.251cm" svg:y2="35.112cm" draw:start-shape="id39" draw:start-glue-point="5" draw:end-shape="id9" draw:end-glue-point="7" svg:d="M25421 35115c-877 0-293-3-1170-3" svg:viewBox="0 0 1171 4">
          <text:p/>
        </draw:connector>
        <draw:connector draw:style-name="gr9" draw:text-style-name="P1" draw:layer="layout" draw:type="curve" svg:x1="22.661cm" svg:y1="32.697cm" svg:x2="27.008cm" svg:y2="34.226cm" draw:start-shape="id40" draw:start-glue-point="2" draw:end-shape="id39" draw:end-glue-point="0" svg:d="M22661 32697c0 1147 4347 383 4347 1529" svg:viewBox="0 0 4348 1530">
          <text:p/>
        </draw:connector>
        <draw:connector draw:style-name="gr9" draw:text-style-name="P1" draw:layer="layout" draw:type="curve" svg:x1="22.661cm" svg:y1="32.697cm" svg:x2="22.663cm" svg:y2="34.223cm" draw:start-shape="id40" draw:start-glue-point="2" draw:end-shape="id9" draw:end-glue-point="0" svg:d="M22661 32697c0 1144 2 382 2 1526" svg:viewBox="0 0 3 1527">
          <text:p/>
        </draw:connector>
        <draw:connector draw:style-name="gr6" draw:text-style-name="P1" draw:layer="layout" draw:type="curve" svg:x1="21.963cm" svg:y1="29.962cm" svg:x2="21.963cm" svg:y2="30.919cm" draw:start-shape="id16" draw:start-glue-point="6" draw:end-shape="id40" draw:end-glue-point="4" svg:d="M21963 29962v957" svg:viewBox="0 0 1 958">
          <text:p/>
        </draw:connector>
        <draw:connector draw:style-name="gr6" draw:text-style-name="P1" draw:layer="layout" draw:type="curve" svg:x1="21.963cm" svg:y1="27.302cm" svg:x2="21.963cm" svg:y2="28.184cm" draw:start-shape="id15" draw:start-glue-point="6" draw:end-shape="id16" draw:end-glue-point="4" svg:d="M21963 27302v882" svg:viewBox="0 0 1 883">
          <text:p/>
        </draw:connector>
        <draw:connector draw:style-name="gr6" draw:text-style-name="P1" draw:layer="layout" draw:type="curve" svg:x1="22.086cm" svg:y1="22.013cm" svg:x2="22.087cm" svg:y2="23.026cm" draw:start-shape="id41" draw:start-glue-point="8" draw:end-shape="id20" draw:end-glue-point="8" svg:d="M22086 22013c0 760 1 254 1 1013" svg:viewBox="0 0 2 1014">
          <text:p/>
        </draw:connector>
        <draw:connector draw:style-name="gr2" draw:text-style-name="P1" draw:layer="layout" draw:type="curve" svg:x1="22.661cm" svg:y1="22.013cm" svg:x2="22.661cm" svg:y2="23.026cm" draw:start-shape="id41" draw:start-glue-point="2" draw:end-shape="id20" draw:end-glue-point="0" svg:d="M22661 22013v1013" svg:viewBox="0 0 1 1014">
          <text:p/>
        </draw:connector>
        <draw:connector draw:style-name="gr10" draw:text-style-name="P1" draw:layer="layout" draw:type="curve" svg:x1="16.655cm" svg:y1="13.836cm" svg:x2="21.074cm" svg:y2="21.124cm" draw:start-shape="id42" draw:start-glue-point="5" draw:end-shape="id41" draw:end-glue-point="5" svg:d="M16655 13836c0 4859 1473 7288 4419 7288" svg:viewBox="0 0 4420 7289">
          <text:p/>
        </draw:connector>
        <draw:connector draw:style-name="gr3" draw:text-style-name="P1" draw:layer="layout" draw:type="curve" svg:x1="10.626cm" svg:y1="21.364cm" svg:x2="15.705cm" svg:y2="14.153cm" draw:start-shape="id43" draw:start-glue-point="7" draw:end-shape="id42" draw:end-glue-point="4" svg:d="M10626 21364c3386 0 5079-2403 5079-7211" svg:viewBox="0 0 5080 7212">
          <text:p/>
        </draw:connector>
        <draw:connector draw:style-name="gr11" draw:text-style-name="P1" draw:layer="layout" draw:type="curve" svg:x1="4.361cm" svg:y1="8.266cm" svg:x2="7.446cm" svg:y2="12.166cm" draw:start-shape="id44" draw:start-glue-point="6" draw:end-shape="id45" draw:end-glue-point="5" svg:d="M4361 8266c0 2600 1028 3900 3085 3900" svg:viewBox="0 0 3086 3901">
          <text:p/>
        </draw:connector>
        <draw:connector draw:style-name="gr5" draw:text-style-name="P1" draw:layer="layout" draw:type="line" svg:x1="9.049cm" svg:y1="68.178cm" svg:x2="9.049cm" svg:y2="68.941cm" draw:start-shape="id46" draw:start-glue-point="2" draw:end-shape="id47" draw:end-glue-point="0" svg:d="M9049 68178v763" svg:viewBox="0 0 1 764">
          <text:p/>
        </draw:connector>
        <draw:connector draw:style-name="gr12" draw:text-style-name="P1" draw:layer="layout" draw:type="curve" svg:x1="8.882cm" svg:y1="80.393cm" svg:x2="12.108cm" svg:y2="76.997cm" draw:start-shape="id48" draw:start-glue-point="9" draw:end-shape="id1" draw:end-glue-point="5" svg:d="M8882 80393c0-2264 1075-3396 3226-3396" svg:viewBox="0 0 3227 3397">
          <text:p/>
        </draw:connector>
        <draw:connector draw:style-name="gr13" draw:text-style-name="P1" draw:layer="layout" draw:type="curve" svg:x1="13.695cm" svg:y1="78.292cm" svg:x2="11.326cm" svg:y2="80.229cm" draw:start-shape="id1" draw:start-glue-point="2" draw:end-shape="id3" draw:end-glue-point="4" svg:d="M13695 78292c0 1452-2369 484-2369 1937" svg:viewBox="0 0 2370 1938">
          <text:p/>
        </draw:connector>
        <draw:connector draw:style-name="gr5" draw:text-style-name="P1" draw:layer="layout" draw:type="curve" svg:x1="7.982cm" svg:y1="73.745cm" svg:x2="7.981cm" svg:y2="75.701cm" draw:start-shape="id25" draw:start-glue-point="8" draw:end-shape="id23" draw:end-glue-point="9" svg:d="M7982 73745c0 1468-1 491-1 1956" svg:viewBox="0 0 2 1957">
          <text:p/>
        </draw:connector>
        <draw:connector draw:style-name="gr12" draw:text-style-name="P1" draw:layer="layout" draw:type="curve" svg:x1="6.044cm" svg:y1="78.343cm" svg:x2="6.047cm" svg:y2="80.241cm" draw:start-shape="id23" draw:start-glue-point="10" draw:end-shape="id48" draw:end-glue-point="8" svg:d="M6044 78343c0 1423 3 475 3 1898" svg:viewBox="0 0 4 1899">
          <text:p/>
        </draw:connector>
        <draw:connector draw:style-name="gr5" draw:text-style-name="P1" draw:layer="layout" draw:type="curve" svg:x1="9.049cm" svg:y1="70.759cm" svg:x2="9.049cm" svg:y2="71.511cm" draw:start-shape="id47" draw:start-glue-point="2" draw:end-shape="id25" draw:end-glue-point="0" svg:d="M9049 70759v752" svg:viewBox="0 0 1 753">
          <text:p/>
        </draw:connector>
        <draw:connector draw:style-name="gr5" draw:text-style-name="P1" draw:layer="layout" draw:type="curve" svg:x1="9.049cm" svg:y1="59.111cm" svg:x2="9.049cm" svg:y2="59.814cm" draw:start-shape="id49" draw:start-glue-point="2" draw:end-shape="id50" draw:end-glue-point="0" svg:d="M9049 59111v703" svg:viewBox="0 0 1 704">
          <text:p/>
        </draw:connector>
        <draw:connector draw:style-name="gr5" draw:text-style-name="P1" draw:layer="layout" draw:type="curve" svg:x1="9.049cm" svg:y1="62.049cm" svg:x2="9.049cm" svg:y2="62.854cm" draw:start-shape="id50" draw:start-glue-point="2" draw:end-shape="id51" draw:end-glue-point="0" svg:d="M9049 62049v805" svg:viewBox="0 0 1 806">
          <text:p/>
        </draw:connector>
        <draw:connector draw:style-name="gr5" draw:text-style-name="P1" draw:layer="layout" draw:type="curve" svg:x1="9.049cm" svg:y1="65.14cm" svg:x2="9.049cm" svg:y2="65.955cm" draw:start-shape="id51" draw:start-glue-point="2" draw:end-shape="id46" draw:end-glue-point="0" svg:d="M9049 65140v815" svg:viewBox="0 0 1 816">
          <text:p/>
        </draw:connector>
        <draw:connector draw:style-name="gr5" draw:text-style-name="P1" draw:layer="layout" draw:type="curve" svg:x1="9.047cm" svg:y1="29.458cm" svg:x2="9.051cm" svg:y2="30.303cm" draw:start-shape="id52" draw:start-glue-point="2" draw:end-shape="id53" draw:end-glue-point="0" svg:d="M9047 29458c0 634 4 212 4 845" svg:viewBox="0 0 5 846">
          <text:p/>
        </draw:connector>
        <draw:connector draw:style-name="gr5" draw:text-style-name="P1" draw:layer="layout" draw:type="line" svg:x1="9.044cm" svg:y1="26.742cm" svg:x2="9.047cm" svg:y2="27.68cm" draw:start-shape="id54" draw:start-glue-point="6" draw:end-shape="id52" draw:end-glue-point="0" svg:d="M9044 26742l3 938" svg:viewBox="0 0 4 939">
          <text:p/>
        </draw:connector>
        <draw:connector draw:style-name="gr5" draw:text-style-name="P1" draw:layer="layout" draw:type="curve" svg:x1="9.046cm" svg:y1="55.579cm" svg:x2="9.049cm" svg:y2="56.571cm" draw:start-shape="id55" draw:start-glue-point="6" draw:end-shape="id49" draw:end-glue-point="0" svg:d="M9046 55579c0 745 3 250 3 992" svg:viewBox="0 0 4 993">
          <text:p/>
        </draw:connector>
        <draw:connector draw:style-name="gr5" draw:text-style-name="P1" draw:layer="layout" draw:type="curve" svg:x1="9.053cm" svg:y1="51.507cm" svg:x2="9.046cm" svg:y2="52.415cm" draw:start-shape="id56" draw:start-glue-point="2" draw:end-shape="id55" draw:end-glue-point="4" svg:d="M9053 51507c0 682-7 229-7 908" svg:viewBox="0 0 8 909">
          <text:p/>
        </draw:connector>
        <draw:connector draw:style-name="gr5" draw:text-style-name="P1" draw:layer="layout" draw:type="curve" svg:x1="9.053cm" svg:y1="48.788cm" svg:x2="9.053cm" svg:y2="49.729cm" draw:start-shape="id57" draw:start-glue-point="2" draw:end-shape="id56" draw:end-glue-point="0" svg:d="M9053 48788v941" svg:viewBox="0 0 1 942">
          <text:p/>
        </draw:connector>
        <draw:connector draw:style-name="gr5" draw:text-style-name="P1" draw:layer="layout" draw:type="curve" svg:x1="9.05cm" svg:y1="45.562cm" svg:x2="9.053cm" svg:y2="46.553cm" draw:start-shape="id6" draw:start-glue-point="6" draw:end-shape="id57" draw:end-glue-point="0" svg:d="M9050 45562c0 742 3 247 3 991" svg:viewBox="0 0 4 992">
          <text:p/>
        </draw:connector>
        <draw:connector draw:style-name="gr5" draw:text-style-name="P1" draw:layer="layout" draw:type="line" svg:x1="9.054cm" svg:y1="36.179cm" svg:x2="9.054cm" svg:y2="36.761cm" draw:start-shape="id58" draw:start-glue-point="2" draw:end-shape="id59" draw:end-glue-point="0" svg:d="M9054 36179v582" svg:viewBox="0 0 1 583">
          <text:p/>
        </draw:connector>
        <draw:connector draw:style-name="gr5" draw:text-style-name="P1" draw:layer="layout" draw:type="line" svg:x1="9.051cm" svg:y1="32.487cm" svg:x2="9.054cm" svg:y2="33.385cm" draw:start-shape="id53" draw:start-glue-point="2" draw:end-shape="id58" draw:end-glue-point="0" svg:d="M9051 32487l3 898" svg:viewBox="0 0 4 899">
          <text:p/>
        </draw:connector>
        <draw:connector draw:style-name="gr4" draw:text-style-name="P1" draw:layer="layout" draw:type="line" svg:x1="9.04cm" svg:y1="19.389cm" svg:x2="9.038cm" svg:y2="20.246cm" draw:start-shape="id18" draw:start-glue-point="2" draw:end-shape="id43" draw:end-glue-point="0" svg:d="M9040 19389l-2 857" svg:viewBox="0 0 3 858">
          <text:p/>
        </draw:connector>
        <draw:connector draw:style-name="gr8" draw:text-style-name="P1" draw:layer="layout" draw:type="curve" svg:x1="9.033cm" svg:y1="13.283cm" svg:x2="9.039cm" svg:y2="14.095cm" draw:start-shape="id45" draw:start-glue-point="2" draw:end-shape="id17" draw:end-glue-point="0" svg:d="M9033 13283c0 609 6 203 6 812" svg:viewBox="0 0 7 813">
          <text:p/>
        </draw:connector>
        <draw:connector draw:style-name="gr14" draw:text-style-name="P1" draw:layer="layout" svg:x1="9.024cm" svg:y1="2.35cm" svg:x2="9.024cm" svg:y2="3.696cm" draw:start-shape="id60" draw:start-glue-point="0" draw:end-shape="id61" draw:end-glue-point="0" svg:d="M9024 2350v1346" svg:viewBox="0 0 1 1347">
          <text:p/>
        </draw:connector>
        <draw:connector draw:style-name="gr15" draw:text-style-name="P1" draw:layer="layout" draw:type="curve" svg:x1="5.9cm" svg:y1="85.462cm" svg:x2="3.798cm" svg:y2="77.935cm" draw:start-shape="id2" draw:start-glue-point="8" draw:end-shape="id24" draw:end-glue-point="8" svg:d="M5900 85462c-1402 0-2102-2509-2102-7527" svg:viewBox="0 0 2103 7528">
          <text:p/>
        </draw:connector>
        <draw:connector draw:style-name="gr15" draw:text-style-name="P1" draw:layer="layout" draw:type="curve" svg:x1="3.003cm" svg:y1="77.936cm" svg:x2="5.9cm" svg:y2="87.165cm" draw:start-shape="id24" draw:start-glue-point="6" draw:end-shape="id2" draw:end-glue-point="9" svg:d="M3003 77936c0 6153 965 9229 2897 9229" svg:viewBox="0 0 2898 9230">
          <text:p/>
        </draw:connector>
        <draw:connector draw:style-name="gr15" draw:text-style-name="P1" draw:layer="layout" draw:type="curve" svg:x1="10.769cm" svg:y1="87.02cm" svg:x2="12.374cm" svg:y2="87.02cm" draw:start-shape="id2" draw:start-glue-point="10" draw:end-shape="id62" draw:end-glue-point="5" svg:d="M10769 87020h1605" svg:viewBox="0 0 1606 1">
          <text:p/>
        </draw:connector>
        <draw:connector draw:style-name="gr2" draw:text-style-name="P1" draw:layer="layout" draw:type="curve" svg:x1="9.029cm" svg:y1="10.495cm" svg:x2="9.033cm" svg:y2="11.048cm" draw:start-shape="id19" draw:start-glue-point="2" draw:end-shape="id45" draw:end-glue-point="0" svg:d="M9029 10495c0 414 4 138 4 553" svg:viewBox="0 0 5 554">
          <text:p/>
        </draw:connector>
        <draw:connector draw:style-name="gr2" draw:text-style-name="P1" draw:layer="layout" draw:type="curve" svg:x1="9.026cm" svg:y1="8.257cm" svg:x2="9.029cm" svg:y2="8.806cm" draw:start-shape="id63" draw:start-glue-point="2" draw:end-shape="id19" draw:end-glue-point="0" svg:d="M9026 8257c0 373 3 99 3 549" svg:viewBox="0 0 4 550">
          <text:p/>
        </draw:connector>
        <draw:connector draw:style-name="gr4" draw:text-style-name="P1" draw:layer="layout" draw:type="curve" svg:x1="13.332cm" svg:y1="87.979cm" svg:x2="10.22cm" svg:y2="89.125cm" draw:start-shape="id62" draw:start-glue-point="6" draw:end-shape="id64" draw:end-glue-point="7" svg:d="M13332 87979c0 764-1037 1146-3112 1146" svg:viewBox="0 0 3113 1147">
          <text:p/>
        </draw:connector>
        <draw:custom-shape draw:style-name="gr16" draw:text-style-name="P3" xml:id="id19" draw:id="id19"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7" draw:text-style-name="P5" xml:id="id17" draw:id="id17"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7" xml:id="id45" draw:id="id45"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9" xml:id="id41" draw:id="id41"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5" xml:id="id18" draw:id="id18"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43" draw:start-glue-point="2" draw:end-shape="id54" draw:end-glue-point="4" svg:d="M9038 22481c0 718 6 239 6 959" svg:viewBox="0 0 7 960">
          <text:p/>
        </draw:connector>
        <draw:custom-shape draw:style-name="gr21" draw:text-style-name="P11" xml:id="id53" draw:id="id53" draw:layer="layout" svg:width="3.505cm" svg:height="2.184cm" svg:x="7.299cm" svg:y="30.303cm">
          <text:p text:style-name="P10"><text:span text:style-name="T9">Jehoshaph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1" xml:id="id58" draw:id="id58"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1" xml:id="id21" draw:id="id21"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2" xml:id="id65" draw:id="id65"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5" draw:id="id5" draw:layer="layout" draw:type="curve" svg:x1="21.076cm" svg:y1="38.37cm" svg:x2="20.461cm" svg:y2="38.371cm" draw:start-shape="id10" draw:start-glue-point="5" draw:end-shape="id65" draw:end-glue-point="7" svg:d="M21076 38370c-501 0-194 1-615 1" svg:viewBox="0 0 616 2">
          <text:p/>
        </draw:connector>
        <draw:connector draw:style-name="gr8" draw:text-style-name="P1" draw:layer="layout" draw:type="curve" svg:x1="21.965cm" svg:y1="36.001cm" svg:x2="21.965cm" svg:y2="37.481cm" draw:start-shape="id9" draw:start-glue-point="6" draw:end-shape="id10" draw:end-glue-point="4" svg:d="M21965 36001v1480" svg:viewBox="0 0 1 1481">
          <text:p/>
        </draw:connector>
        <draw:custom-shape draw:style-name="gr25" draw:text-style-name="P14" xml:id="id57" draw:id="id57"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6" xml:id="id56" draw:id="id56"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4" xml:id="id55" draw:id="id55"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8" draw:text-style-name="P16" xml:id="id49" draw:id="id49"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10" draw:start-glue-point="2" draw:end-shape="id8" draw:end-glue-point="8" svg:d="M22663 39259c0 1461 2826 195 2826 2532" svg:viewBox="0 0 2827 2533">
          <text:p/>
        </draw:connector>
        <draw:custom-shape draw:style-name="gr29" draw:text-style-name="P14" xml:id="id50" draw:id="id50"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6" xml:id="id63" draw:id="id63"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8" xml:id="id61" draw:id="id61"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8" xml:id="id67" draw:id="id67"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20" xml:id="id66" draw:id="id66"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61" draw:start-glue-point="2" draw:end-shape="id63" draw:end-glue-point="0" svg:d="M9024 5474c0 754 2 252 2 1005" svg:viewBox="0 0 3 1006">
          <text:p/>
        </draw:connector>
        <draw:custom-shape draw:style-name="gr34" draw:text-style-name="P18" xml:id="id44" draw:id="id44"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61" draw:start-glue-point="2" draw:end-shape="id44" draw:end-glue-point="0" svg:d="M9024 5474c0 254-991 508-1983 508-991 0-1982 253-1982 506" svg:viewBox="0 0 3966 1015">
          <text:p/>
        </draw:connector>
        <draw:connector draw:style-name="gr3" draw:text-style-name="P1" draw:layer="layout" draw:type="curve" svg:x1="7.442cm" svg:y1="9.651cm" svg:x2="5.059cm" svg:y2="8.266cm" draw:start-shape="id19" draw:start-glue-point="5" draw:end-shape="id44" draw:end-glue-point="2" svg:d="M7442 9651c-1589 0-2383-461-2383-1385" svg:viewBox="0 0 2384 1386">
          <text:p/>
        </draw:connector>
        <draw:custom-shape draw:style-name="gr35" draw:text-style-name="P22" xml:id="id51" draw:id="id51"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6" xml:id="id46" draw:id="id46"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7" draw:text-style-name="P16" xml:id="id47" draw:id="id47"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6" xml:id="id25" draw:id="id25"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16" xml:id="id1" draw:id="id1"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14" xml:id="id3" draw:id="id3"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14" xml:id="id23" draw:id="id23"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2" draw:text-style-name="P14" xml:id="id24" draw:id="id24"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60" draw:id="id60" draw:layer="layout" draw:type="line" svg:x1="8.552cm" svg:y1="2.35cm" svg:x2="9.497cm" svg:y2="2.35cm" draw:start-shape="id66" draw:start-glue-point="7" draw:end-shape="id67" draw:end-glue-point="5" svg:d="M8552 2350h945" svg:viewBox="0 0 946 1">
          <text:p/>
        </draw:connector>
        <draw:custom-shape draw:style-name="gr43" draw:text-style-name="P18" xml:id="id29" draw:id="id29"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23" xml:id="id28" draw:id="id28" draw:layer="layout" svg:width="3.175cm" svg:height="1.778cm" svg:x="11.229cm" svg:y="71.739cm">
          <text:p text:style-name="P2"><text:span text:style-name="T9">Zebudah</text:span></text:p>
          <text:p text:style-name="P2"><text:span text:style-name="T10">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23" xml:id="id26" draw:id="id26"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6" xml:id="id62" draw:id="id62"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4" xml:id="id2" draw:id="id2"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buchadnezzar</text:span></text:p>
          <text:p text:style-name="P13"><text:span text:style-name="T16">king of Babylon</text:span></text:p>
          <text:p text:style-name="P13"><text:span text:style-name="T5">2Ki 24:1</text:span></text:p>
          <text:p text:style-name="P13"><text:span text:style-name="T16">Nebuchadrezzar</text:span></text:p>
          <text:p text:style-name="P13"><text:span text:style-name="T5">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6" xml:id="id64" draw:id="id64" draw:layer="layout" svg:width="3.772cm" svg:height="1.709cm" svg:x="6.448cm" svg:y="88.27cm">
          <text:p text:style-name="P15"><text:span text:style-name="T17">Evil-merodach</text:span></text:p>
          <text:p text:style-name="P15"><text:span text:style-name="T10">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5" xml:id="id43" draw:id="id43"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5" xml:id="id54" draw:id="id54"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1" draw:text-style-name="P5" xml:id="id52" draw:id="id52"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42" draw:start-glue-point="6" draw:end-shape="id29" draw:end-glue-point="7" svg:d="M16235 11891c0-3956-565-5933-1695-5933" svg:viewBox="0 0 1696 5934">
          <text:p/>
        </draw:connector>
        <draw:custom-shape draw:style-name="gr52" draw:text-style-name="P25" xml:id="id42" draw:id="id42"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6" xml:id="id48" draw:id="id48"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27" xml:id="id7" draw:id="id7"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5" draw:text-style-name="P27" xml:id="id8" draw:id="id8" draw:layer="layout" svg:width="3.175cm" svg:height="1.778cm" svg:x="23.139cm" svg:y="41.791cm">
          <draw:glue-point draw:id="8" svg:x="2.406cm" svg:y="-5.07cm"/>
          <text:p text:style-name="P26"><text:span text:style-name="T23">Ahaziah</text:span></text:p>
          <text:p text:style-name="P26"><text:span text:style-name="T2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6" draw:text-style-name="P27" xml:id="id10" draw:id="id10"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29" xml:id="id9" draw:id="id9"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2" xml:id="id6" draw:id="id6"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30" xml:id="id20" draw:id="id20"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30" xml:id="id15" draw:id="id15" draw:layer="layout" svg:width="3.175cm" svg:height="1.778cm" svg:x="21.074cm" svg:y="25.524cm">
          <draw:glue-point draw:id="8" svg:x="-1.975cm" svg:y="5cm"/>
          <text:p text:style-name="P8"><text:span text:style-name="T6">Baasha</text:span></text:p>
          <text:p text:style-name="P8"><text:span text:style-name="T7">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30" xml:id="id16" draw:id="id16" draw:layer="layout" svg:width="3.175cm" svg:height="1.778cm" svg:x="21.074cm" svg:y="28.184cm">
          <text:p text:style-name="P8"><text:span text:style-name="T6">Elah</text:span></text:p>
          <text:p text:style-name="P8"><text:span text:style-name="T7">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30" xml:id="id40" draw:id="id40"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29" xml:id="id39" draw:id="id39"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4" draw:text-style-name="P27" xml:id="id32" draw:id="id32"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5" draw:text-style-name="P27" xml:id="id33" draw:id="id33" draw:layer="layout" svg:width="3.175cm" svg:height="1.778cm" svg:x="19.112cm" svg:y="47.569cm">
          <draw:glue-point draw:id="8" svg:x="2.406cm" svg:y="-5.07cm"/>
          <text:p text:style-name="P26"><text:span text:style-name="T6">Jehoahaz</text:span></text:p>
          <text:p text:style-name="P26"><text:span text:style-name="T2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27" xml:id="id34" draw:id="id34"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27" xml:id="id36" draw:id="id36"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27" xml:id="id35" draw:id="id35"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27" xml:id="id38" draw:id="id38"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27" xml:id="id30" draw:id="id30"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7" xml:id="id31" draw:id="id31"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7" xml:id="id37" draw:id="id37"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3" draw:text-style-name="P27" xml:id="id12" draw:id="id12"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6" xml:id="id13" draw:id="id13" draw:layer="layout" svg:width="3.861cm" svg:height="1.778cm" svg:x="18.778cm" svg:y="71.598cm">
          <text:p text:style-name="P15"><text:span text:style-name="T13">Shalmaneser king of Assyria</text:span></text:p>
          <text:p text:style-name="P15"><text:span text:style-name="T14">2Ki 17:1-18:1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5" draw:text-style-name="P31" xml:id="id14" draw:id="id14" draw:layer="layout" svg:width="4.064cm" svg:height="3.556cm" svg:x="18.677cm" svg:y="75.001cm">
          <text:p text:style-name="P2"><text:span text:style-name="T26">Men from Babylon, Cuthah, Ava, Hamath, &amp; Sepharvaim</text:span></text:p>
          <text:p text:style-name="P2"><text:span text:style-name="T10">2Ki 17: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1" xml:id="id59" draw:id="id59" draw:layer="layout" svg:width="3.175cm" svg:height="2.083cm" svg:x="7.467cm" svg:y="36.761cm">
          <text:p text:style-name="P10"><text:span text:style-name="T11">Elder</text:span></text:p>
          <text:p text:style-name="P10"><text:span text:style-name="T9">Ahaziah</text:span></text:p>
          <text:p text:style-name="P10"><text:span text:style-name="T10">2Ki 9:29</text:span></text:p>
          <text:p text:style-name="P10"><text:span text:style-name="T10">2Ch 22:2-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59" draw:start-glue-point="2" draw:end-shape="id21" draw:end-glue-point="4" svg:d="M9054 38844v628" svg:viewBox="0 0 1 629">
          <text:p/>
        </draw:connector>
        <draw:custom-shape draw:style-name="gr77" draw:text-style-name="P14" xml:id="id4" draw:id="id4" draw:layer="layout" svg:width="3.15cm" svg:height="5.537cm" svg:x="14.24cm" svg:y="80.23cm">
          <draw:glue-point draw:id="8" svg:x="-2.126cm" svg:y="-5cm"/>
          <draw:glue-point draw:id="9" svg:x="-5cm" svg:y="3.545cm"/>
          <text:p text:style-name="P13"><text:span text:style-name="T11">Elder</text:span></text:p>
          <text:p text:style-name="P13"><text:span text:style-name="T9">Jehoiachin</text:span></text:p>
          <text:p text:style-name="P13"><text:span text:style-name="T10">2Ki 24:12-14</text:span></text:p>
          <text:p text:style-name="P13"><text:span text:style-name="T10">2Ch 36:9,10</text:span></text:p>
          <text:p text:style-name="P13"><text:span text:style-name="T9">Jeconiah</text:span></text:p>
          <text:p text:style-name="P13"><text:span text:style-name="T10">2Ki 24:12</text:span></text:p>
          <text:p text:style-name="P13"><text:span text:style-name="T10">Jer 24:1, 29:2</text:span></text:p>
          <text:p text:style-name="P13"><text:span text:style-name="T9">Coniah</text:span></text:p>
          <text:p text:style-name="P13"><text:span text:style-name="T10">Jer 22:24,28</text:span></text:p>
          <text:p text:style-name="P13"><text:span text:style-name="T9">Jeconias</text:span></text:p>
          <text:p text:style-name="P13"><text:span text:style-name="T10">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1" draw:start-glue-point="2" draw:end-shape="id4" draw:end-glue-point="4" svg:d="M13695 78292c0 1453 2120 485 2120 1938" svg:viewBox="0 0 2121 1939">
          <text:p/>
        </draw:connector>
        <draw:custom-shape draw:style-name="gr78" draw:text-style-name="P33" xml:id="id11" draw:id="id11"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2" draw:master-page-name="Default">
        <draw:connector draw:style-name="gr1" draw:text-style-name="P1" draw:layer="layout" draw:type="curve" svg:x1="13.695cm" svg:y1="78.292cm" svg:x2="10.769cm" svg:y2="85.692cm" draw:start-shape="id68" draw:start-glue-point="2" draw:end-shape="id69" draw:end-glue-point="14" svg:d="M13695 78292c0 4934-975 7400-2926 7400" svg:viewBox="0 0 2927 7401">
          <text:p/>
        </draw:connector>
        <draw:connector draw:style-name="gr1" draw:text-style-name="P1" draw:layer="layout" draw:type="curve" svg:x1="11.326cm" svg:y1="83.404cm" svg:x2="10.768cm" svg:y2="85.288cm" draw:start-shape="id70" draw:start-glue-point="6" draw:end-shape="id69" draw:end-glue-point="13" svg:d="M11326 83404c0 1256-186 1884-558 1884" svg:viewBox="0 0 559 1885">
          <text:p/>
        </draw:connector>
        <draw:connector draw:style-name="gr1" draw:text-style-name="P1" draw:layer="layout" draw:type="curve" svg:x1="14.24cm" svg:y1="84.96cm" svg:x2="10.769cm" svg:y2="85.692cm" draw:start-shape="id71" draw:start-glue-point="9" draw:end-shape="id69" draw:end-glue-point="14" svg:d="M14240 84960c-2602 0-867 732-3471 732" svg:viewBox="0 0 3472 733">
          <text:p/>
        </draw:connector>
        <draw:connector draw:style-name="gr2" draw:text-style-name="P1" draw:layer="layout" draw:type="curve" draw:line-skew="0.761cm" svg:x1="20.728cm" svg:y1="38.37cm" svg:x2="10.986cm" svg:y2="43.784cm" draw:start-shape="id72" draw:start-glue-point="0" draw:end-shape="id73" draw:end-glue-point="8" svg:d="M20728 38370c0 5242-9742 2536-9742 5414" svg:viewBox="0 0 9743 5415">
          <text:p/>
        </draw:connector>
        <draw:connector draw:style-name="gr2" draw:text-style-name="P1" draw:layer="layout" draw:type="curve" svg:x1="20.728cm" svg:y1="38.37cm" svg:x2="20.7cm" svg:y2="41.663cm" draw:start-shape="id72" draw:start-glue-point="0" draw:end-shape="id74" draw:end-glue-point="0" svg:d="M20728 38370c0 2511-28 865-28 3293" svg:viewBox="0 0 29 3294">
          <text:p/>
        </draw:connector>
        <draw:connector draw:style-name="gr2" draw:text-style-name="P1" draw:layer="layout" draw:type="curve" svg:x1="20.728cm" svg:y1="38.37cm" svg:x2="24.028cm" svg:y2="41.791cm" draw:start-shape="id72" draw:start-glue-point="0" draw:end-shape="id75" draw:end-glue-point="4" svg:d="M20728 38370c0 2605 3300 895 3300 3421" svg:viewBox="0 0 3301 3422">
          <text:p/>
        </draw:connector>
        <draw:connector draw:style-name="gr2" draw:text-style-name="P1" draw:layer="layout" draw:type="curve" svg:x1="22.663cm" svg:y1="36.001cm" svg:x2="22.663cm" svg:y2="37.481cm" draw:start-shape="id76" draw:start-glue-point="2" draw:end-shape="id77" draw:end-glue-point="0" svg:d="M22663 36001v1480" svg:viewBox="0 0 1 1481">
          <text:p/>
        </draw:connector>
        <draw:connector draw:style-name="gr2" draw:text-style-name="P1" draw:layer="layout" draw:type="curve" svg:x1="26.403cm" svg:y1="37.482cm" svg:x2="22.663cm" svg:y2="36.001cm" draw:start-shape="id78" draw:start-glue-point="0" draw:end-shape="id76" draw:end-glue-point="2" svg:d="M26403 37482c0-357-935-714-1870-714s-1870-384-1870-767" svg:viewBox="0 0 3741 1482">
          <text:p/>
        </draw:connector>
        <draw:connector draw:style-name="gr3" draw:text-style-name="P1" draw:layer="layout" draw:type="curve" svg:x1="20.708cm" svg:y1="70.044cm" svg:x2="20.708cm" svg:y2="71.598cm" draw:start-shape="id79" draw:start-glue-point="2" draw:end-shape="id80" draw:end-glue-point="0" svg:d="M20708 70044v1554" svg:viewBox="0 0 1 1555">
          <text:p/>
        </draw:connector>
        <draw:connector draw:style-name="gr3" draw:text-style-name="P1" draw:layer="layout" draw:type="curve" svg:x1="20.708cm" svg:y1="73.376cm" svg:x2="20.709cm" svg:y2="75.001cm" draw:start-shape="id80" draw:start-glue-point="2" draw:end-shape="id81" draw:end-glue-point="0" svg:d="M20708 73376c0 1219 1 407 1 1625" svg:viewBox="0 0 2 1626">
          <text:p/>
        </draw:connector>
        <draw:connector draw:style-name="gr2" draw:text-style-name="P1" draw:layer="layout" draw:type="curve" svg:x1="22.661cm" svg:y1="27.302cm" svg:x2="22.661cm" svg:y2="28.184cm" draw:start-shape="id82" draw:start-glue-point="2" draw:end-shape="id83" draw:end-glue-point="0" svg:d="M22661 27302v882" svg:viewBox="0 0 1 883">
          <text:p/>
        </draw:connector>
        <draw:connector draw:style-name="gr4" draw:text-style-name="P1" draw:layer="layout" draw:type="line" svg:x1="9.039cm" svg:y1="16.33cm" svg:x2="9.04cm" svg:y2="17.154cm" draw:start-shape="id84" draw:start-glue-point="2" draw:end-shape="id85" draw:end-glue-point="0" svg:d="M9039 16330l1 824" svg:viewBox="0 0 2 825">
          <text:p/>
        </draw:connector>
        <draw:connector draw:style-name="gr5" draw:text-style-name="P1" draw:layer="layout" draw:type="curve" svg:x1="10.56cm" svg:y1="10.393cm" svg:x2="10.547cm" svg:y2="14.198cm" draw:start-shape="id86" draw:start-glue-point="9" draw:end-shape="id84" draw:end-glue-point="10" svg:d="M10560 10393c930 0 936 3805-13 3805" svg:viewBox="0 0 712 3806">
          <text:p/>
        </draw:connector>
        <draw:connector draw:style-name="gr6" draw:text-style-name="P1" draw:layer="layout" draw:type="curve" svg:x1="21.963cm" svg:y1="24.804cm" svg:x2="21.963cm" svg:y2="25.524cm" draw:start-shape="id87" draw:start-glue-point="6" draw:end-shape="id82" draw:end-glue-point="4" svg:d="M21963 24804v720" svg:viewBox="0 0 1 721">
          <text:p/>
        </draw:connector>
        <draw:connector draw:style-name="gr5" draw:text-style-name="P1" draw:layer="layout" draw:type="curve" svg:x1="9.054cm" svg:y1="43.028cm" svg:x2="9.05cm" svg:y2="43.784cm" draw:start-shape="id88" draw:start-glue-point="6" draw:end-shape="id73" draw:end-glue-point="4" svg:d="M9054 43028c0 568-4 191-4 756" svg:viewBox="0 0 5 757">
          <text:p/>
        </draw:connector>
        <draw:connector draw:style-name="gr2" draw:text-style-name="P1" draw:layer="layout" draw:type="curve" svg:x1="7.164cm" svg:y1="72.628cm" svg:x2="7.172cm" svg:y2="75.701cm" draw:start-shape="id89" draw:start-glue-point="0" draw:end-shape="id90" draw:end-glue-point="0" svg:d="M7164 72628c0 2346 8 810 8 3073" svg:viewBox="0 0 9 3074">
          <text:p/>
        </draw:connector>
        <draw:connector draw:style-name="gr2" draw:text-style-name="P1" draw:layer="layout" draw:type="curve" draw:line-skew="0.289cm" svg:x1="3.472cm" svg:y1="75.701cm" svg:x2="7.164cm" svg:y2="72.628cm" draw:start-shape="id91" draw:start-glue-point="0" draw:end-shape="id89" draw:end-glue-point="0" svg:d="M3472 75701c0-1831 3692-295 3692-3073" svg:viewBox="0 0 3693 3074">
          <text:p/>
        </draw:connector>
        <draw:connector draw:style-name="gr7" draw:text-style-name="P1" xml:id="id89" draw:id="id89" draw:layer="layout" draw:type="curve" svg:x1="7.462cm" svg:y1="72.629cm" svg:x2="6.944cm" svg:y2="72.627cm" draw:start-shape="id92" draw:start-glue-point="5" draw:end-shape="id93" draw:end-glue-point="7" svg:d="M7462 72629c-427 0-169-2-518-2" svg:viewBox="0 0 519 3">
          <text:p/>
        </draw:connector>
        <draw:connector draw:style-name="gr2" draw:text-style-name="P1" draw:layer="layout" draw:type="curve" draw:line-skew="0.374cm" svg:x1="10.972cm" svg:y1="72.628cm" svg:x2="13.695cm" svg:y2="75.701cm" draw:start-shape="id94" draw:start-glue-point="0" draw:end-shape="id68" draw:end-glue-point="0" svg:d="M10972 72628c0 2905 2723 1369 2723 3073" svg:viewBox="0 0 2724 3074">
          <text:p/>
        </draw:connector>
        <draw:connector draw:style-name="gr7" draw:text-style-name="P1" xml:id="id94" draw:id="id94" draw:layer="layout" draw:type="curve" svg:x1="10.637cm" svg:y1="72.629cm" svg:x2="11.229cm" svg:y2="72.628cm" draw:start-shape="id92" draw:start-glue-point="7" draw:end-shape="id95" draw:end-glue-point="5" svg:d="M10637 72629c483 0 187-1 592-1" svg:viewBox="0 0 593 2">
          <text:p/>
        </draw:connector>
        <draw:connector draw:style-name="gr4" draw:text-style-name="P1" draw:layer="layout" draw:type="curve" svg:x1="12.952cm" svg:y1="6.847cm" svg:x2="10.617cm" svg:y2="9.33cm" draw:start-shape="id96" draw:start-glue-point="2" draw:end-shape="id86" draw:end-glue-point="8" svg:d="M12952 6847c0 1656-778 2483-2335 2483" svg:viewBox="0 0 2336 2484">
          <text:p/>
        </draw:connector>
        <draw:connector draw:style-name="gr8" draw:text-style-name="P1" draw:layer="layout" draw:type="curve" svg:x1="23.139cm" svg:y1="42.68cm" svg:x2="22.288cm" svg:y2="42.679cm" draw:start-shape="id75" draw:start-glue-point="5" draw:end-shape="id74" draw:end-glue-point="7" svg:d="M23139 42680c-639 0-214-1-851-1" svg:viewBox="0 0 852 2">
          <text:p/>
        </draw:connector>
        <draw:connector draw:style-name="gr8" draw:text-style-name="P1" draw:layer="layout" draw:type="curve" svg:x1="20.004cm" svg:y1="62.031cm" svg:x2="20.006cm" svg:y2="62.754cm" draw:start-shape="id97" draw:start-glue-point="6" draw:end-shape="id98" draw:end-glue-point="4" svg:d="M20004 62031c0 543 2 182 2 723" svg:viewBox="0 0 3 724">
          <text:p/>
        </draw:connector>
        <draw:connector draw:style-name="gr8" draw:text-style-name="P1" draw:layer="layout" draw:type="curve" svg:x1="20.001cm" svg:y1="46.497cm" svg:x2="20.001cm" svg:y2="47.569cm" draw:start-shape="id99" draw:start-glue-point="6" draw:end-shape="id100" draw:end-glue-point="4" svg:d="M20001 46497v1072" svg:viewBox="0 0 1 1073">
          <text:p/>
        </draw:connector>
        <draw:connector draw:style-name="gr8" draw:text-style-name="P1" draw:layer="layout" draw:type="curve" svg:x1="20.001cm" svg:y1="49.347cm" svg:x2="19.998cm" svg:y2="50.358cm" draw:start-shape="id100" draw:start-glue-point="6" draw:end-shape="id101" draw:end-glue-point="9" svg:d="M20001 49347c0 759-3 254-3 1011" svg:viewBox="0 0 4 1012">
          <text:p/>
        </draw:connector>
        <draw:connector draw:style-name="gr8" draw:text-style-name="P1" draw:layer="layout" draw:type="curve" svg:x1="20.128cm" svg:y1="52.39cm" svg:x2="20.129cm" svg:y2="53.007cm" draw:start-shape="id101" draw:start-glue-point="6" draw:end-shape="id102" draw:end-glue-point="9" svg:d="M20128 52390c0 463 1 155 1 617" svg:viewBox="0 0 2 618">
          <text:p/>
        </draw:connector>
        <draw:connector draw:style-name="gr8" draw:text-style-name="P1" draw:layer="layout" draw:type="curve" svg:x1="20.005cm" svg:y1="54.785cm" svg:x2="20.004cm" svg:y2="55.437cm" draw:start-shape="id102" draw:start-glue-point="6" draw:end-shape="id103" draw:end-glue-point="4" svg:d="M20005 54785c0 490-1 165-1 652" svg:viewBox="0 0 2 653">
          <text:p/>
        </draw:connector>
        <draw:connector draw:style-name="gr8" draw:text-style-name="P1" draw:layer="layout" draw:type="curve" svg:x1="20.009cm" svg:y1="67.133cm" svg:x2="20.01cm" svg:y2="68.266cm" draw:start-shape="id104" draw:start-glue-point="6" draw:end-shape="id79" draw:end-glue-point="4" svg:d="M20009 67133c0 850 1 284 1 1133" svg:viewBox="0 0 2 1134">
          <text:p/>
        </draw:connector>
        <draw:connector draw:style-name="gr8" draw:text-style-name="P1" draw:layer="layout" draw:type="curve" svg:x1="20.006cm" svg:y1="64.532cm" svg:x2="20.009cm" svg:y2="65.355cm" draw:start-shape="id98" draw:start-glue-point="6" draw:end-shape="id104" draw:end-glue-point="4" svg:d="M20006 64532c0 618 3 207 3 823" svg:viewBox="0 0 4 824">
          <text:p/>
        </draw:connector>
        <draw:connector draw:style-name="gr2" draw:text-style-name="P1" draw:layer="layout" draw:type="curve" svg:x1="20.702cm" svg:y1="62.031cm" svg:x2="20.704cm" svg:y2="62.754cm" draw:start-shape="id97" draw:start-glue-point="2" draw:end-shape="id98" draw:end-glue-point="0" svg:d="M20702 62031c0 543 2 182 2 723" svg:viewBox="0 0 3 724">
          <text:p/>
        </draw:connector>
        <draw:connector draw:style-name="gr8" draw:text-style-name="P1" draw:layer="layout" draw:type="curve" svg:x1="20.004cm" svg:y1="59.616cm" svg:x2="20.004cm" svg:y2="60.253cm" draw:start-shape="id105" draw:start-glue-point="6" draw:end-shape="id97" draw:end-glue-point="4" svg:d="M20004 59616v637" svg:viewBox="0 0 1 638">
          <text:p/>
        </draw:connector>
        <draw:connector draw:style-name="gr8" draw:text-style-name="P1" draw:layer="layout" draw:type="curve" svg:x1="20.004cm" svg:y1="57.215cm" svg:x2="20.004cm" svg:y2="57.838cm" draw:start-shape="id103" draw:start-glue-point="6" draw:end-shape="id105" draw:end-glue-point="4" svg:d="M20004 57215v623" svg:viewBox="0 0 1 624">
          <text:p/>
        </draw:connector>
        <draw:connector draw:style-name="gr2" draw:text-style-name="P1" draw:layer="layout" draw:type="curve" svg:x1="20.703cm" svg:y1="54.785cm" svg:x2="20.702cm" svg:y2="55.437cm" draw:start-shape="id102" draw:start-glue-point="2" draw:end-shape="id103" draw:end-glue-point="0" svg:d="M20703 54785c0 490-1 165-1 652" svg:viewBox="0 0 2 653">
          <text:p/>
        </draw:connector>
        <draw:connector draw:style-name="gr2" draw:text-style-name="P1" draw:layer="layout" draw:type="curve" svg:x1="20.699cm" svg:y1="52.39cm" svg:x2="20.703cm" svg:y2="53.007cm" draw:start-shape="id101" draw:start-glue-point="2" draw:end-shape="id102" draw:end-glue-point="0" svg:d="M20699 52390c0 463 4 155 4 617" svg:viewBox="0 0 5 618">
          <text:p/>
        </draw:connector>
        <draw:connector draw:style-name="gr2" draw:text-style-name="P1" draw:layer="layout" draw:type="curve" svg:x1="20.699cm" svg:y1="49.347cm" svg:x2="20.699cm" svg:y2="50.358cm" draw:start-shape="id100" draw:start-glue-point="2" draw:end-shape="id101" draw:end-glue-point="0" svg:d="M20699 49347v1011" svg:viewBox="0 0 1 1012">
          <text:p/>
        </draw:connector>
        <draw:connector draw:style-name="gr2" draw:text-style-name="P1" draw:layer="layout" draw:type="curve" svg:x1="20.699cm" svg:y1="46.497cm" svg:x2="20.699cm" svg:y2="47.569cm" draw:start-shape="id99" draw:start-glue-point="2" draw:end-shape="id100" draw:end-glue-point="0" svg:d="M20699 46497v1072" svg:viewBox="0 0 1 1073">
          <text:p/>
        </draw:connector>
        <draw:connector draw:style-name="gr8" draw:text-style-name="P1" draw:layer="layout" draw:type="curve" svg:x1="20.7cm" svg:y1="43.695cm" svg:x2="20.699cm" svg:y2="44.719cm" draw:start-shape="id74" draw:start-glue-point="2" draw:end-shape="id99" draw:end-glue-point="0" svg:d="M20700 43695c0 769-1 258-1 1024" svg:viewBox="0 0 2 1025">
          <text:p/>
        </draw:connector>
        <draw:connector draw:style-name="gr9" draw:text-style-name="P1" draw:layer="layout" draw:type="curve" svg:x1="25.421cm" svg:y1="35.115cm" svg:x2="24.251cm" svg:y2="35.112cm" draw:start-shape="id106" draw:start-glue-point="5" draw:end-shape="id76" draw:end-glue-point="7" svg:d="M25421 35115c-877 0-293-3-1170-3" svg:viewBox="0 0 1171 4">
          <text:p/>
        </draw:connector>
        <draw:connector draw:style-name="gr9" draw:text-style-name="P1" draw:layer="layout" draw:type="curve" svg:x1="22.661cm" svg:y1="32.697cm" svg:x2="27.008cm" svg:y2="34.226cm" draw:start-shape="id107" draw:start-glue-point="2" draw:end-shape="id106" draw:end-glue-point="0" svg:d="M22661 32697c0 1147 4347 383 4347 1529" svg:viewBox="0 0 4348 1530">
          <text:p/>
        </draw:connector>
        <draw:connector draw:style-name="gr9" draw:text-style-name="P1" draw:layer="layout" draw:type="curve" svg:x1="22.661cm" svg:y1="32.697cm" svg:x2="22.663cm" svg:y2="34.223cm" draw:start-shape="id107" draw:start-glue-point="2" draw:end-shape="id76" draw:end-glue-point="0" svg:d="M22661 32697c0 1144 2 382 2 1526" svg:viewBox="0 0 3 1527">
          <text:p/>
        </draw:connector>
        <draw:connector draw:style-name="gr6" draw:text-style-name="P1" draw:layer="layout" draw:type="curve" svg:x1="21.963cm" svg:y1="29.962cm" svg:x2="21.963cm" svg:y2="30.919cm" draw:start-shape="id83" draw:start-glue-point="6" draw:end-shape="id107" draw:end-glue-point="4" svg:d="M21963 29962v957" svg:viewBox="0 0 1 958">
          <text:p/>
        </draw:connector>
        <draw:connector draw:style-name="gr6" draw:text-style-name="P1" draw:layer="layout" draw:type="curve" svg:x1="21.963cm" svg:y1="27.302cm" svg:x2="21.963cm" svg:y2="28.184cm" draw:start-shape="id82" draw:start-glue-point="6" draw:end-shape="id83" draw:end-glue-point="4" svg:d="M21963 27302v882" svg:viewBox="0 0 1 883">
          <text:p/>
        </draw:connector>
        <draw:connector draw:style-name="gr6" draw:text-style-name="P1" draw:layer="layout" draw:type="curve" svg:x1="22.086cm" svg:y1="22.013cm" svg:x2="22.087cm" svg:y2="23.026cm" draw:start-shape="id108" draw:start-glue-point="8" draw:end-shape="id87" draw:end-glue-point="8" svg:d="M22086 22013c0 760 1 254 1 1013" svg:viewBox="0 0 2 1014">
          <text:p/>
        </draw:connector>
        <draw:connector draw:style-name="gr2" draw:text-style-name="P1" draw:layer="layout" draw:type="curve" svg:x1="22.661cm" svg:y1="22.013cm" svg:x2="22.661cm" svg:y2="23.026cm" draw:start-shape="id108" draw:start-glue-point="2" draw:end-shape="id87" draw:end-glue-point="0" svg:d="M22661 22013v1013" svg:viewBox="0 0 1 1014">
          <text:p/>
        </draw:connector>
        <draw:connector draw:style-name="gr10" draw:text-style-name="P1" draw:layer="layout" draw:type="curve" svg:x1="16.655cm" svg:y1="13.836cm" svg:x2="21.074cm" svg:y2="21.124cm" draw:start-shape="id109" draw:start-glue-point="5" draw:end-shape="id108" draw:end-glue-point="5" svg:d="M16655 13836c0 4859 1473 7288 4419 7288" svg:viewBox="0 0 4420 7289">
          <text:p/>
        </draw:connector>
        <draw:connector draw:style-name="gr3" draw:text-style-name="P1" draw:layer="layout" draw:type="curve" svg:x1="10.626cm" svg:y1="21.364cm" svg:x2="15.705cm" svg:y2="14.153cm" draw:start-shape="id110" draw:start-glue-point="7" draw:end-shape="id109" draw:end-glue-point="4" svg:d="M10626 21364c3386 0 5079-2403 5079-7211" svg:viewBox="0 0 5080 7212">
          <text:p/>
        </draw:connector>
        <draw:connector draw:style-name="gr11" draw:text-style-name="P1" draw:layer="layout" draw:type="curve" svg:x1="4.361cm" svg:y1="8.266cm" svg:x2="7.446cm" svg:y2="12.166cm" draw:start-shape="id111" draw:start-glue-point="6" draw:end-shape="id112" draw:end-glue-point="5" svg:d="M4361 8266c0 2600 1028 3900 3085 3900" svg:viewBox="0 0 3086 3901">
          <text:p/>
        </draw:connector>
        <draw:connector draw:style-name="gr5" draw:text-style-name="P1" draw:layer="layout" draw:type="line" svg:x1="9.049cm" svg:y1="68.178cm" svg:x2="9.049cm" svg:y2="68.941cm" draw:start-shape="id113" draw:start-glue-point="2" draw:end-shape="id114" draw:end-glue-point="0" svg:d="M9049 68178v763" svg:viewBox="0 0 1 764">
          <text:p/>
        </draw:connector>
        <draw:connector draw:style-name="gr12" draw:text-style-name="P1" draw:layer="layout" draw:type="curve" svg:x1="8.882cm" svg:y1="80.393cm" svg:x2="12.108cm" svg:y2="76.997cm" draw:start-shape="id115" draw:start-glue-point="9" draw:end-shape="id68" draw:end-glue-point="5" svg:d="M8882 80393c0-2264 1075-3396 3226-3396" svg:viewBox="0 0 3227 3397">
          <text:p/>
        </draw:connector>
        <draw:connector draw:style-name="gr13" draw:text-style-name="P1" draw:layer="layout" draw:type="curve" svg:x1="13.695cm" svg:y1="78.292cm" svg:x2="11.326cm" svg:y2="80.229cm" draw:start-shape="id68" draw:start-glue-point="2" draw:end-shape="id70" draw:end-glue-point="4" svg:d="M13695 78292c0 1452-2369 484-2369 1937" svg:viewBox="0 0 2370 1938">
          <text:p/>
        </draw:connector>
        <draw:connector draw:style-name="gr5" draw:text-style-name="P1" draw:layer="layout" draw:type="curve" svg:x1="7.982cm" svg:y1="73.745cm" svg:x2="7.981cm" svg:y2="75.701cm" draw:start-shape="id92" draw:start-glue-point="8" draw:end-shape="id90" draw:end-glue-point="9" svg:d="M7982 73745c0 1468-1 491-1 1956" svg:viewBox="0 0 2 1957">
          <text:p/>
        </draw:connector>
        <draw:connector draw:style-name="gr12" draw:text-style-name="P1" draw:layer="layout" draw:type="curve" svg:x1="6.044cm" svg:y1="78.343cm" svg:x2="6.047cm" svg:y2="80.241cm" draw:start-shape="id90" draw:start-glue-point="10" draw:end-shape="id115" draw:end-glue-point="8" svg:d="M6044 78343c0 1423 3 475 3 1898" svg:viewBox="0 0 4 1899">
          <text:p/>
        </draw:connector>
        <draw:connector draw:style-name="gr5" draw:text-style-name="P1" draw:layer="layout" draw:type="curve" svg:x1="9.049cm" svg:y1="70.759cm" svg:x2="9.049cm" svg:y2="71.511cm" draw:start-shape="id114" draw:start-glue-point="2" draw:end-shape="id92" draw:end-glue-point="0" svg:d="M9049 70759v752" svg:viewBox="0 0 1 753">
          <text:p/>
        </draw:connector>
        <draw:connector draw:style-name="gr5" draw:text-style-name="P1" draw:layer="layout" draw:type="curve" svg:x1="9.049cm" svg:y1="59.111cm" svg:x2="9.049cm" svg:y2="59.814cm" draw:start-shape="id116" draw:start-glue-point="2" draw:end-shape="id117" draw:end-glue-point="0" svg:d="M9049 59111v703" svg:viewBox="0 0 1 704">
          <text:p/>
        </draw:connector>
        <draw:connector draw:style-name="gr5" draw:text-style-name="P1" draw:layer="layout" draw:type="curve" svg:x1="9.049cm" svg:y1="62.049cm" svg:x2="9.049cm" svg:y2="62.854cm" draw:start-shape="id117" draw:start-glue-point="2" draw:end-shape="id118" draw:end-glue-point="0" svg:d="M9049 62049v805" svg:viewBox="0 0 1 806">
          <text:p/>
        </draw:connector>
        <draw:connector draw:style-name="gr5" draw:text-style-name="P1" draw:layer="layout" draw:type="curve" svg:x1="9.049cm" svg:y1="65.14cm" svg:x2="9.049cm" svg:y2="65.955cm" draw:start-shape="id118" draw:start-glue-point="2" draw:end-shape="id113" draw:end-glue-point="0" svg:d="M9049 65140v815" svg:viewBox="0 0 1 816">
          <text:p/>
        </draw:connector>
        <draw:connector draw:style-name="gr5" draw:text-style-name="P1" draw:layer="layout" draw:type="curve" svg:x1="9.047cm" svg:y1="29.458cm" svg:x2="9.051cm" svg:y2="30.303cm" draw:start-shape="id119" draw:start-glue-point="2" draw:end-shape="id120" draw:end-glue-point="0" svg:d="M9047 29458c0 634 4 212 4 845" svg:viewBox="0 0 5 846">
          <text:p/>
        </draw:connector>
        <draw:connector draw:style-name="gr5" draw:text-style-name="P1" draw:layer="layout" draw:type="line" svg:x1="9.044cm" svg:y1="26.742cm" svg:x2="9.047cm" svg:y2="27.68cm" draw:start-shape="id121" draw:start-glue-point="6" draw:end-shape="id119" draw:end-glue-point="0" svg:d="M9044 26742l3 938" svg:viewBox="0 0 4 939">
          <text:p/>
        </draw:connector>
        <draw:connector draw:style-name="gr5" draw:text-style-name="P1" draw:layer="layout" draw:type="curve" svg:x1="9.046cm" svg:y1="55.579cm" svg:x2="9.049cm" svg:y2="56.571cm" draw:start-shape="id122" draw:start-glue-point="6" draw:end-shape="id116" draw:end-glue-point="0" svg:d="M9046 55579c0 745 3 250 3 992" svg:viewBox="0 0 4 993">
          <text:p/>
        </draw:connector>
        <draw:connector draw:style-name="gr5" draw:text-style-name="P1" draw:layer="layout" draw:type="curve" svg:x1="9.053cm" svg:y1="51.507cm" svg:x2="9.046cm" svg:y2="52.415cm" draw:start-shape="id123" draw:start-glue-point="2" draw:end-shape="id122" draw:end-glue-point="4" svg:d="M9053 51507c0 682-7 229-7 908" svg:viewBox="0 0 8 909">
          <text:p/>
        </draw:connector>
        <draw:connector draw:style-name="gr5" draw:text-style-name="P1" draw:layer="layout" draw:type="curve" svg:x1="9.053cm" svg:y1="48.788cm" svg:x2="9.053cm" svg:y2="49.729cm" draw:start-shape="id124" draw:start-glue-point="2" draw:end-shape="id123" draw:end-glue-point="0" svg:d="M9053 48788v941" svg:viewBox="0 0 1 942">
          <text:p/>
        </draw:connector>
        <draw:connector draw:style-name="gr5" draw:text-style-name="P1" draw:layer="layout" draw:type="curve" svg:x1="9.05cm" svg:y1="45.562cm" svg:x2="9.053cm" svg:y2="46.553cm" draw:start-shape="id73" draw:start-glue-point="6" draw:end-shape="id124" draw:end-glue-point="0" svg:d="M9050 45562c0 742 3 247 3 991" svg:viewBox="0 0 4 992">
          <text:p/>
        </draw:connector>
        <draw:connector draw:style-name="gr5" draw:text-style-name="P1" draw:layer="layout" draw:type="line" svg:x1="9.054cm" svg:y1="36.179cm" svg:x2="9.054cm" svg:y2="36.761cm" draw:start-shape="id125" draw:start-glue-point="2" draw:end-shape="id126" draw:end-glue-point="0" svg:d="M9054 36179v582" svg:viewBox="0 0 1 583">
          <text:p/>
        </draw:connector>
        <draw:connector draw:style-name="gr5" draw:text-style-name="P1" draw:layer="layout" draw:type="line" svg:x1="9.051cm" svg:y1="32.487cm" svg:x2="9.054cm" svg:y2="33.385cm" draw:start-shape="id120" draw:start-glue-point="2" draw:end-shape="id125" draw:end-glue-point="0" svg:d="M9051 32487l3 898" svg:viewBox="0 0 4 899">
          <text:p/>
        </draw:connector>
        <draw:connector draw:style-name="gr4" draw:text-style-name="P1" draw:layer="layout" draw:type="line" svg:x1="9.04cm" svg:y1="19.389cm" svg:x2="9.038cm" svg:y2="20.246cm" draw:start-shape="id85" draw:start-glue-point="2" draw:end-shape="id110" draw:end-glue-point="0" svg:d="M9040 19389l-2 857" svg:viewBox="0 0 3 858">
          <text:p/>
        </draw:connector>
        <draw:connector draw:style-name="gr8" draw:text-style-name="P1" draw:layer="layout" draw:type="curve" svg:x1="9.033cm" svg:y1="13.283cm" svg:x2="9.039cm" svg:y2="14.095cm" draw:start-shape="id112" draw:start-glue-point="2" draw:end-shape="id84" draw:end-glue-point="0" svg:d="M9033 13283c0 609 6 203 6 812" svg:viewBox="0 0 7 813">
          <text:p/>
        </draw:connector>
        <draw:connector draw:style-name="gr14" draw:text-style-name="P1" draw:layer="layout" svg:x1="9.024cm" svg:y1="2.35cm" svg:x2="9.024cm" svg:y2="3.696cm" draw:start-shape="id127" draw:start-glue-point="0" draw:end-shape="id128" draw:end-glue-point="0" svg:d="M9024 2350v1346" svg:viewBox="0 0 1 1347">
          <text:p/>
        </draw:connector>
        <draw:connector draw:style-name="gr15" draw:text-style-name="P1" draw:layer="layout" draw:type="curve" svg:x1="5.9cm" svg:y1="85.462cm" svg:x2="3.798cm" svg:y2="77.935cm" draw:start-shape="id69" draw:start-glue-point="8" draw:end-shape="id91" draw:end-glue-point="8" svg:d="M5900 85462c-1402 0-2102-2509-2102-7527" svg:viewBox="0 0 2103 7528">
          <text:p/>
        </draw:connector>
        <draw:connector draw:style-name="gr15" draw:text-style-name="P1" draw:layer="layout" draw:type="curve" svg:x1="3.003cm" svg:y1="77.936cm" svg:x2="5.9cm" svg:y2="87.165cm" draw:start-shape="id91" draw:start-glue-point="6" draw:end-shape="id69" draw:end-glue-point="9" svg:d="M3003 77936c0 6153 965 9229 2897 9229" svg:viewBox="0 0 2898 9230">
          <text:p/>
        </draw:connector>
        <draw:connector draw:style-name="gr15" draw:text-style-name="P1" draw:layer="layout" draw:type="curve" svg:x1="10.769cm" svg:y1="87.02cm" svg:x2="12.374cm" svg:y2="87.02cm" draw:start-shape="id69" draw:start-glue-point="10" draw:end-shape="id129" draw:end-glue-point="5" svg:d="M10769 87020h1605" svg:viewBox="0 0 1606 1">
          <text:p/>
        </draw:connector>
        <draw:connector draw:style-name="gr2" draw:text-style-name="P1" draw:layer="layout" draw:type="curve" svg:x1="9.029cm" svg:y1="10.495cm" svg:x2="9.033cm" svg:y2="11.048cm" draw:start-shape="id86" draw:start-glue-point="2" draw:end-shape="id112" draw:end-glue-point="0" svg:d="M9029 10495c0 414 4 138 4 553" svg:viewBox="0 0 5 554">
          <text:p/>
        </draw:connector>
        <draw:connector draw:style-name="gr2" draw:text-style-name="P1" draw:layer="layout" draw:type="curve" svg:x1="9.026cm" svg:y1="8.257cm" svg:x2="9.029cm" svg:y2="8.806cm" draw:start-shape="id130" draw:start-glue-point="2" draw:end-shape="id86" draw:end-glue-point="0" svg:d="M9026 8257c0 373 3 99 3 549" svg:viewBox="0 0 4 550">
          <text:p/>
        </draw:connector>
        <draw:connector draw:style-name="gr4" draw:text-style-name="P1" draw:layer="layout" draw:type="curve" svg:x1="13.332cm" svg:y1="87.979cm" svg:x2="10.22cm" svg:y2="89.125cm" draw:start-shape="id129" draw:start-glue-point="6" draw:end-shape="id131" draw:end-glue-point="7" svg:d="M13332 87979c0 764-1037 1146-3112 1146" svg:viewBox="0 0 3113 1147">
          <text:p/>
        </draw:connector>
        <draw:custom-shape draw:style-name="gr79" draw:text-style-name="P3" xml:id="id86" draw:id="id86" draw:layer="layout" svg:width="3.175cm" svg:height="1.689cm" svg:x="7.442cm" svg:y="8.806cm">
          <draw:glue-point draw:id="8" svg:x="5.115cm" svg:y="-1.897cm"/>
          <draw:glue-point draw:id="9" svg:x="4.825cm" svg:y="4.404cm"/>
          <text:p text:style-name="P2"><text:span text:style-name="T1">Saul</text:span></text:p>
          <text:p text:style-name="P2"><text:span text:style-name="T2">1Sa 9:2</text:span></text:p>
          <text:p text:style-name="P2"><text:span text:style-name="T2">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5" xml:id="id84" draw:id="id84" draw:layer="layout" svg:width="3.175cm" svg:height="2.235cm" svg:x="7.452cm" svg:y="14.095cm">
          <draw:glue-point draw:id="8" svg:x="2.77cm" svg:y="-5.239cm"/>
          <draw:glue-point draw:id="9" svg:x="-0.293cm" svg:y="5.243cm"/>
          <draw:glue-point draw:id="10" svg:x="4.752cm" svg:y="-4.541cm"/>
          <text:p text:style-name="P4"><text:span text:style-name="T1">David</text:span></text:p>
          <text:p text:style-name="P4"><text:span text:style-name="T3">1Sa 16:1</text:span></text:p>
          <text:p text:style-name="P4"><text:span text:style-name="T3">2Sa 2:4,11</text:span></text:p>
          <text:p text:style-name="P4"><text:span text:style-name="T3">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7" xml:id="id112" draw:id="id112" draw:layer="layout" svg:width="3.175cm" svg:height="2.235cm" svg:x="7.446cm" svg:y="11.048cm">
          <text:p text:style-name="P6"><text:span text:style-name="T1">Ishbosheth</text:span></text:p>
          <text:p text:style-name="P6"><text:span text:style-name="T4">2Sa 2:8</text:span></text:p>
          <text:p text:style-name="P6"><text:span text:style-name="T1">Esh-baal</text:span></text:p>
          <text:p text:style-name="P6"><text:span text:style-name="T5">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9" xml:id="id108" draw:id="id108" draw:layer="layout" svg:width="3.175cm" svg:height="1.778cm" svg:x="21.074cm" svg:y="20.235cm">
          <draw:glue-point draw:id="8" svg:x="-1.812cm" svg:y="5cm"/>
          <text:p text:style-name="P8"><text:span text:style-name="T6">Jeroboam</text:span></text:p>
          <text:p text:style-name="P8"><text:span text:style-name="T7">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5" xml:id="id85" draw:id="id85" draw:layer="layout" svg:width="3.175cm" svg:height="2.235cm" svg:x="7.453cm" svg:y="17.154cm">
          <draw:glue-point draw:id="8" svg:x="2.033cm" svg:y="-5.239cm"/>
          <text:p text:style-name="P4"><text:span text:style-name="T8">Solomon</text:span></text:p>
          <text:p text:style-name="P4"><text:span text:style-name="T4">2Sa 12:24</text:span></text:p>
          <text:p text:style-name="P4"><text:span text:style-name="T1">Jedidiah</text:span></text:p>
          <text:p text:style-name="P4"><text:span text:style-name="T4">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curve" svg:x1="9.038cm" svg:y1="22.481cm" svg:x2="9.044cm" svg:y2="23.44cm" draw:start-shape="id110" draw:start-glue-point="2" draw:end-shape="id121" draw:end-glue-point="4" svg:d="M9038 22481c0 718 6 239 6 959" svg:viewBox="0 0 7 960">
          <text:p/>
        </draw:connector>
        <draw:custom-shape draw:style-name="gr84" draw:text-style-name="P11" xml:id="id120" draw:id="id120" draw:layer="layout" svg:width="3.505cm" svg:height="2.184cm" svg:x="7.299cm" svg:y="30.303cm">
          <text:p text:style-name="P10"><text:span text:style-name="T9">Jehoshaphat</text:span></text:p>
          <text:p text:style-name="P10"><text:span text:style-name="T10">1Ki 15:24</text:span></text:p>
          <text:p text:style-name="P10"><text:span text:style-name="T9">Josaphat</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11" xml:id="id125" draw:id="id125" draw:layer="layout" svg:width="3.175cm" svg:height="2.794cm" svg:x="7.467cm" svg:y="33.385cm">
          <text:p text:style-name="P10"><text:span text:style-name="T9">Jehoram</text:span></text:p>
          <text:p text:style-name="P10"><text:span text:style-name="T10">1Ki 22:50</text:span></text:p>
          <text:p text:style-name="P10"><text:span text:style-name="T9">Joram</text:span></text:p>
          <text:p text:style-name="P10"><text:span text:style-name="T10">2Ki 8:16-24</text:span></text:p>
          <text:p text:style-name="P10"><text:span text:style-name="T10">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11" xml:id="id88" draw:id="id88" draw:layer="layout" svg:width="3.175cm" svg:height="3.556cm" svg:x="7.466cm" svg:y="39.472cm">
          <draw:glue-point draw:id="8" svg:x="2.107cm" svg:y="-5.041cm"/>
          <draw:glue-point draw:id="9" svg:x="4.98cm" svg:y="-3.817cm"/>
          <text:p text:style-name="P10"><text:span text:style-name="T11">Younger</text:span></text:p>
          <text:p text:style-name="P10"><text:span text:style-name="T9">Ahaziah</text:span></text:p>
          <text:p text:style-name="P10"><text:span text:style-name="T10">2Ki 8:24,25</text:span></text:p>
          <text:p text:style-name="P10"><text:span text:style-name="T9">Jehoahaz</text:span></text:p>
          <text:p text:style-name="P10"><text:span text:style-name="T10">2Ch 21:17</text:span></text:p>
          <text:p text:style-name="P10"><text:span text:style-name="T9">Azariah</text:span></text:p>
          <text:p text:style-name="P10"><text:span text:style-name="T10">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12" xml:id="id132" draw:id="id132" draw:layer="layout" svg:width="3.175cm" svg:height="1.778cm" svg:x="17.286cm" svg:y="37.482cm">
          <text:p text:style-name="P2"><text:span text:style-name="T12">Jezebel</text:span></text:p>
          <text:p text:style-name="P2"><text:span text:style-name="T5">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72" draw:id="id72" draw:layer="layout" draw:type="curve" svg:x1="21.076cm" svg:y1="38.37cm" svg:x2="20.461cm" svg:y2="38.371cm" draw:start-shape="id77" draw:start-glue-point="5" draw:end-shape="id132" draw:end-glue-point="7" svg:d="M21076 38370c-501 0-194 1-615 1" svg:viewBox="0 0 616 2">
          <text:p/>
        </draw:connector>
        <draw:connector draw:style-name="gr8" draw:text-style-name="P1" draw:layer="layout" draw:type="curve" svg:x1="21.965cm" svg:y1="36.001cm" svg:x2="21.965cm" svg:y2="37.481cm" draw:start-shape="id76" draw:start-glue-point="6" draw:end-shape="id77" draw:end-glue-point="4" svg:d="M21965 36001v1480" svg:viewBox="0 0 1 1481">
          <text:p/>
        </draw:connector>
        <draw:custom-shape draw:style-name="gr88" draw:text-style-name="P14" xml:id="id124" draw:id="id124" draw:layer="layout" svg:width="3.175cm" svg:height="2.235cm" svg:x="7.466cm" svg:y="46.553cm">
          <draw:glue-point draw:id="8" svg:x="4.925cm" svg:y="-4.268cm"/>
          <text:p text:style-name="P13"><text:span text:style-name="T9">Joash</text:span></text:p>
          <text:p text:style-name="P13"><text:span text:style-name="T10">2Ki 11:12</text:span></text:p>
          <text:p text:style-name="P13"><text:span text:style-name="T9">Jehoash</text:span></text:p>
          <text:p text:style-name="P13"><text:span text:style-name="T10">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9" draw:text-style-name="P16" xml:id="id123" draw:id="id123" draw:layer="layout" svg:width="3.175cm" svg:height="1.778cm" svg:x="7.466cm" svg:y="49.729cm">
          <draw:glue-point draw:id="8" svg:x="-1.254cm" svg:y="-4.996cm"/>
          <text:p text:style-name="P15"><text:span text:style-name="T9">Amaziah</text:span></text:p>
          <text:p text:style-name="P15"><text:span text:style-name="T10">2Ki 12:20,21</text:span></text:p>
          <text:p text:style-name="P15"><text:span text:style-name="T10">2Ch 24: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0" draw:text-style-name="P14" xml:id="id122" draw:id="id122" draw:layer="layout" svg:width="3.175cm" svg:height="3.164cm" svg:x="7.464cm" svg:y="52.415cm">
          <draw:glue-point draw:id="8" svg:x="-1.392cm" svg:y="5.188cm"/>
          <text:p text:style-name="P13"><text:span text:style-name="T9">Azariah</text:span></text:p>
          <text:p text:style-name="P13"><text:span text:style-name="T10">2Ki 14:21</text:span></text:p>
          <text:p text:style-name="P13"><text:span text:style-name="T9">Uzziah</text:span></text:p>
          <text:p text:style-name="P13"><text:span text:style-name="T10">2Ch 26:1</text:span></text:p>
          <text:p text:style-name="P13"><text:span text:style-name="T9">Ozias</text:span></text:p>
          <text:p text:style-name="P13"><text:span text:style-name="T10">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1" draw:text-style-name="P16" xml:id="id116" draw:id="id116" draw:layer="layout" svg:width="3.175cm" svg:height="2.54cm" svg:x="7.462cm" svg:y="56.571cm">
          <text:p text:style-name="P15"><text:span text:style-name="T9">Jotham</text:span></text:p>
          <text:p text:style-name="P15"><text:span text:style-name="T10">2Ki 15:7</text:span></text:p>
          <text:p text:style-name="P15"><text:span text:style-name="T9">Joatham</text:span></text:p>
          <text:p text:style-name="P15"><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1" draw:layer="layout" draw:type="curve" draw:line-skew="-0.292cm" svg:x1="22.663cm" svg:y1="39.259cm" svg:x2="25.489cm" svg:y2="41.791cm" draw:start-shape="id77" draw:start-glue-point="2" draw:end-shape="id75" draw:end-glue-point="8" svg:d="M22663 39259c0 1461 2826 195 2826 2532" svg:viewBox="0 0 2827 2533">
          <text:p/>
        </draw:connector>
        <draw:custom-shape draw:style-name="gr92" draw:text-style-name="P14" xml:id="id117" draw:id="id117" draw:layer="layout" svg:width="3.175cm" svg:height="2.235cm" svg:x="7.462cm" svg:y="59.814cm">
          <text:p text:style-name="P13"><text:span text:style-name="T9">Ahaz</text:span></text:p>
          <text:p text:style-name="P13"><text:span text:style-name="T10">2Ki 15:38</text:span></text:p>
          <text:p text:style-name="P13"><text:span text:style-name="T9">Achaz</text:span></text:p>
          <text:p text:style-name="P13"><text:span text:style-name="T10">Ma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3" draw:text-style-name="P16" xml:id="id130" draw:id="id130" draw:layer="layout" svg:width="3.175cm" svg:height="1.778cm" svg:x="7.439cm" svg:y="6.479cm">
          <text:p text:style-name="P15"><text:span text:style-name="T13">Kish</text:span></text:p>
          <text:p text:style-name="P15"><text:span text:style-name="T14">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4" draw:text-style-name="P18" xml:id="id128" draw:id="id128" draw:layer="layout" svg:width="3.175cm" svg:height="1.778cm" svg:x="7.437cm" svg:y="3.696cm">
          <text:p text:style-name="P17"><text:span text:style-name="T13">Ner</text:span></text:p>
          <text:p text:style-name="P17"><text:span text:style-name="T14">1Sa 14:50,51</text:span></text:p>
          <text:p text:style-name="P17"><text:span text:style-name="T14">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5" draw:text-style-name="P18" xml:id="id134" draw:id="id134" draw:layer="layout" svg:width="3.175cm" svg:height="1.778cm" svg:x="9.497cm" svg:y="1.461cm">
          <text:p text:style-name="P17"><text:span text:style-name="T13">Jehiel</text:span></text:p>
          <text:p text:style-name="P17"><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6" draw:text-style-name="P20" xml:id="id133" draw:id="id133" draw:layer="layout" svg:width="3.048cm" svg:height="1.778cm" svg:x="5.504cm" svg:y="1.461cm">
          <text:p text:style-name="P19"><text:span text:style-name="T13">Maachah</text:span></text:p>
          <text:p text:style-name="P19"><text:span text:style-name="T14">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9.026cm" svg:y2="6.479cm" draw:start-shape="id128" draw:start-glue-point="2" draw:end-shape="id130" draw:end-glue-point="0" svg:d="M9024 5474c0 754 2 252 2 1005" svg:viewBox="0 0 3 1006">
          <text:p/>
        </draw:connector>
        <draw:custom-shape draw:style-name="gr97" draw:text-style-name="P18" xml:id="id111" draw:id="id111" draw:layer="layout" svg:width="3.175cm" svg:height="1.778cm" svg:x="3.472cm" svg:y="6.488cm">
          <text:p text:style-name="P17"><text:span text:style-name="T13">Abner</text:span></text:p>
          <text:p text:style-name="P17"><text:span text:style-name="T14">1Sa 14:50,51</text:span></text:p>
          <text:p text:style-name="P17"><text:span text:style-name="T14">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2" draw:text-style-name="P1" draw:layer="layout" draw:type="curve" svg:x1="9.024cm" svg:y1="5.474cm" svg:x2="5.059cm" svg:y2="6.488cm" draw:start-shape="id128" draw:start-glue-point="2" draw:end-shape="id111" draw:end-glue-point="0" svg:d="M9024 5474c0 254-991 508-1983 508-991 0-1982 253-1982 506" svg:viewBox="0 0 3966 1015">
          <text:p/>
        </draw:connector>
        <draw:connector draw:style-name="gr3" draw:text-style-name="P1" draw:layer="layout" draw:type="curve" svg:x1="7.442cm" svg:y1="9.651cm" svg:x2="5.059cm" svg:y2="8.266cm" draw:start-shape="id86" draw:start-glue-point="5" draw:end-shape="id111" draw:end-glue-point="2" svg:d="M7442 9651c-1589 0-2383-461-2383-1385" svg:viewBox="0 0 2384 1386">
          <text:p/>
        </draw:connector>
        <draw:custom-shape draw:style-name="gr98" draw:text-style-name="P22" xml:id="id118" draw:id="id118" draw:layer="layout" svg:width="3.175cm" svg:height="2.286cm" svg:x="7.462cm" svg:y="62.854cm">
          <draw:glue-point draw:id="8" svg:x="-4.998cm" svg:y="2.217cm"/>
          <text:p text:style-name="P21"><text:span text:style-name="T9">Hezekiah</text:span></text:p>
          <text:p text:style-name="P21"><text:span text:style-name="T10">2Ki 16:20</text:span></text:p>
          <text:p text:style-name="P21"><text:span text:style-name="T9">Ezekias</text:span></text:p>
          <text:p text:style-name="P21"><text:span text:style-name="T10">Ma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99" draw:text-style-name="P16" xml:id="id113" draw:id="id113" draw:layer="layout" svg:width="3.175cm" svg:height="2.223cm" svg:x="7.462cm" svg:y="65.955cm">
          <text:p text:style-name="P15"><text:span text:style-name="T9">Manasseh</text:span></text:p>
          <text:p text:style-name="P15"><text:span text:style-name="T10">2Ki 20:21</text:span></text:p>
          <text:p text:style-name="P15"><text:span text:style-name="T9">Manasses</text:span></text:p>
          <text:p text:style-name="P15"><text:span text:style-name="T10">Ma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0" draw:text-style-name="P16" xml:id="id114" draw:id="id114" draw:layer="layout" svg:width="3.175cm" svg:height="1.818cm" svg:x="7.462cm" svg:y="68.941cm">
          <text:p text:style-name="P15"><text:span text:style-name="T9">Amon</text:span></text:p>
          <text:p text:style-name="P15"><text:span text:style-name="T10">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1" draw:text-style-name="P16" xml:id="id92" draw:id="id92" draw:layer="layout" svg:width="3.175cm" svg:height="2.235cm" svg:x="7.462cm" svg:y="71.511cm">
          <draw:glue-point draw:id="8" svg:x="-3.363cm" svg:y="5.002cm"/>
          <text:p text:style-name="P15"><text:span text:style-name="T8">Josiah</text:span></text:p>
          <text:p text:style-name="P15"><text:span text:style-name="T15">2Ki 21:24</text:span></text:p>
          <text:p text:style-name="P15"><text:span text:style-name="T8">Josias</text:span></text:p>
          <text:p text:style-name="P15"><text:span text:style-name="T10">Ma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2" draw:text-style-name="P16" xml:id="id68" draw:id="id68" draw:layer="layout" svg:width="3.175cm" svg:height="2.591cm" svg:x="12.108cm" svg:y="75.701cm">
          <draw:glue-point draw:id="8" svg:x="-2.822cm" svg:y="-5.239cm"/>
          <draw:glue-point draw:id="9" svg:x="3.656cm" svg:y="5.002cm"/>
          <draw:glue-point draw:id="10" svg:x="1.725cm" svg:y="5.002cm"/>
          <text:p text:style-name="P15"><text:span text:style-name="T9">Eliakim</text:span></text:p>
          <text:p text:style-name="P15"><text:span text:style-name="T10">2Ki 23:34</text:span></text:p>
          <text:p text:style-name="P15"><text:span text:style-name="T9">Jehoiakim</text:span></text:p>
          <text:p text:style-name="P15"><text:span text:style-name="T10">2Ki 23:34</text:span></text:p>
          <text:p text:style-name="P15"><text:span text:style-name="T10">Jer 36: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3" draw:text-style-name="P14" xml:id="id70" draw:id="id70" draw:layer="layout" svg:width="3.15cm" svg:height="3.175cm" svg:x="9.751cm" svg:y="80.229cm">
          <draw:glue-point draw:id="8" svg:x="-2.126cm" svg:y="-5cm"/>
          <draw:glue-point draw:id="9" svg:x="-5.185cm" svg:y="2.488cm"/>
          <text:p text:style-name="P13"><text:span text:style-name="T11">Younger</text:span><text:span text:style-name="T9"> Jehoiachin</text:span></text:p>
          <text:p text:style-name="P13"><text:span text:style-name="T10">2Ki 24:8,1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4" draw:text-style-name="P14" xml:id="id90" draw:id="id90" draw:layer="layout" svg:width="3.175cm" svg:height="2.642cm" svg:x="5.585cm" svg:y="75.701cm">
          <draw:glue-point draw:id="8" svg:x="-2.349cm" svg:y="-5.239cm"/>
          <draw:glue-point draw:id="9" svg:x="2.55cm" svg:y="-5.239cm"/>
          <draw:glue-point draw:id="10" svg:x="-3.555cm" svg:y="5.002cm"/>
          <text:p text:style-name="P13"><text:span text:style-name="T16">Jehoahaz</text:span></text:p>
          <text:p text:style-name="P13"><text:span text:style-name="T10">2Ki 23:30</text:span></text:p>
          <text:p text:style-name="P13"><text:span text:style-name="T16">Shallum</text:span></text:p>
          <text:p text:style-name="P13"><text:span text:style-name="T4">1Ch 3:15</text:span></text:p>
          <text:p text:style-name="P13"><text:span text:style-name="T5">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5" draw:text-style-name="P14" xml:id="id91" draw:id="id91" draw:layer="layout" svg:width="3.175cm" svg:height="2.235cm" svg:x="1.885cm" svg:y="75.701cm">
          <draw:glue-point draw:id="8" svg:x="1.029cm" svg:y="5.002cm"/>
          <text:p text:style-name="P13"><text:span text:style-name="T16">Mattaniah</text:span></text:p>
          <text:p text:style-name="P13"><text:span text:style-name="T5">2Ki 24:17</text:span></text:p>
          <text:p text:style-name="P13"><text:span text:style-name="T16">Zedekiah</text:span></text:p>
          <text:p text:style-name="P13"><text:span text:style-name="T5">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7" draw:text-style-name="P1" xml:id="id127" draw:id="id127" draw:layer="layout" draw:type="line" svg:x1="8.552cm" svg:y1="2.35cm" svg:x2="9.497cm" svg:y2="2.35cm" draw:start-shape="id133" draw:start-glue-point="7" draw:end-shape="id134" draw:end-glue-point="5" svg:d="M8552 2350h945" svg:viewBox="0 0 946 1">
          <text:p/>
        </draw:connector>
        <draw:custom-shape draw:style-name="gr106" draw:text-style-name="P18" xml:id="id96" draw:id="id96" draw:layer="layout" svg:width="3.175cm" svg:height="1.778cm" svg:x="11.365cm" svg:y="5.069cm">
          <text:p text:style-name="P17"><text:span text:style-name="T13">Samuel</text:span></text:p>
          <text:p text:style-name="P17"><text:span text:style-name="T14">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7" draw:text-style-name="P23" xml:id="id95" draw:id="id95" draw:layer="layout" svg:width="3.175cm" svg:height="1.778cm" svg:x="11.229cm" svg:y="71.739cm">
          <text:p text:style-name="P2"><text:span text:style-name="T9">Zebudah</text:span></text:p>
          <text:p text:style-name="P2"><text:span text:style-name="T10">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8" draw:text-style-name="P23" xml:id="id93" draw:id="id93" draw:layer="layout" svg:width="3.175cm" svg:height="1.778cm" svg:x="3.769cm" svg:y="71.738cm">
          <text:p text:style-name="P2"><text:span text:style-name="T9">Hamutal</text:span></text:p>
          <text:p text:style-name="P2"><text:span text:style-name="T10">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9" draw:text-style-name="P16" xml:id="id129" draw:id="id129" draw:layer="layout" svg:width="2.642cm" svg:height="1.917cm" svg:x="12.374cm" svg:y="86.062cm">
          <text:p text:style-name="P15"><text:span text:style-name="T17">Gedaliah</text:span></text:p>
          <text:p text:style-name="P15"><text:span text:style-name="T10">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0" draw:text-style-name="P14" xml:id="id69" draw:id="id69" draw:layer="layout" svg:width="4.869cm" svg:height="2.998cm" svg:x="5.9cm" svg:y="84.781cm">
          <draw:glue-point draw:id="8" svg:x="-5.115cm" svg:y="-2.729cm"/>
          <draw:glue-point draw:id="9" svg:x="-5.115cm" svg:y="2.953cm"/>
          <draw:glue-point draw:id="10" svg:x="5.109cm" svg:y="2.471cm"/>
          <draw:glue-point draw:id="11" svg:x="-3.148cm" svg:y="-5.176cm"/>
          <draw:glue-point draw:id="12" svg:x="-2.407cm" svg:y="-5.176cm"/>
          <draw:glue-point draw:id="13" svg:x="5.001cm" svg:y="-3.312cm"/>
          <draw:glue-point draw:id="14" svg:x="5.109cm" svg:y="-1.964cm"/>
          <text:p text:style-name="P13"><text:span text:style-name="T16">Nebuchadnezzar</text:span></text:p>
          <text:p text:style-name="P13"><text:span text:style-name="T16">king of Babylon</text:span></text:p>
          <text:p text:style-name="P13"><text:span text:style-name="T5">2Ki 24:1</text:span></text:p>
          <text:p text:style-name="P13"><text:span text:style-name="T16">Nebuchadrezzar</text:span></text:p>
          <text:p text:style-name="P13"><text:span text:style-name="T5">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1" draw:text-style-name="P16" xml:id="id131" draw:id="id131" draw:layer="layout" svg:width="3.772cm" svg:height="1.709cm" svg:x="6.448cm" svg:y="88.27cm">
          <text:p text:style-name="P15"><text:span text:style-name="T17">Evil-merodach</text:span></text:p>
          <text:p text:style-name="P15"><text:span text:style-name="T10">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2" draw:text-style-name="P5" xml:id="id110" draw:id="id110" draw:layer="layout" svg:width="3.175cm" svg:height="2.235cm" svg:x="7.451cm" svg:y="20.246cm">
          <draw:glue-point draw:id="8" svg:x="4.795cm" svg:y="-4.715cm"/>
          <text:p text:style-name="P4"><text:span text:style-name="T1">Rehoboam</text:span></text:p>
          <text:p text:style-name="P4"><text:span text:style-name="T4">1Ki 14:21</text:span></text:p>
          <text:p text:style-name="P4"><text:span text:style-name="T1">Roboam</text:span></text:p>
          <text:p text:style-name="P4"><text:span text:style-name="T4">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3" draw:text-style-name="P5" xml:id="id121" draw:id="id121" draw:layer="layout" svg:width="3.175cm" svg:height="3.302cm" svg:x="7.456cm" svg:y="23.44cm">
          <draw:glue-point draw:id="8" svg:x="-1.165cm" svg:y="-5cm"/>
          <draw:glue-point draw:id="9" svg:x="-1.657cm" svg:y="5.163cm"/>
          <draw:glue-point draw:id="10" svg:x="-1.657cm" svg:y="-5.115cm"/>
          <text:p text:style-name="P4"><text:span text:style-name="T8">Abijam</text:span></text:p>
          <text:p text:style-name="P4"><text:span text:style-name="T10">1Ki 14:31</text:span></text:p>
          <text:p text:style-name="P4"><text:span text:style-name="T8">Abijah</text:span></text:p>
          <text:p text:style-name="P4"><text:span text:style-name="T4">2Ch 12:16</text:span></text:p>
          <text:p text:style-name="P4"><text:span text:style-name="T12">Abia</text:span><text:span text:style-name="T18"> </text:span></text:p>
          <text:p text:style-name="P4"><text:span text:style-name="T4">1Ch 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4" draw:text-style-name="P5" xml:id="id119" draw:id="id119" draw:layer="layout" svg:width="3.175cm" svg:height="1.778cm" svg:x="7.46cm" svg:y="27.68cm">
          <draw:glue-point draw:id="8" svg:x="-1.657cm" svg:y="-5.298cm"/>
          <text:p text:style-name="P4"><text:span text:style-name="T8">Asa</text:span></text:p>
          <text:p text:style-name="P4"><text:span text:style-name="T10">1Ki 15:8</text:span></text:p>
          <text:p text:style-name="P4"><text:span text:style-name="T10">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4" draw:text-style-name="P1" draw:layer="layout" draw:type="curve" svg:x1="16.235cm" svg:y1="11.891cm" svg:x2="14.54cm" svg:y2="5.958cm" draw:start-shape="id109" draw:start-glue-point="6" draw:end-shape="id96" draw:end-glue-point="7" svg:d="M16235 11891c0-3956-565-5933-1695-5933" svg:viewBox="0 0 1696 5934">
          <text:p/>
        </draw:connector>
        <draw:custom-shape draw:style-name="gr115" draw:text-style-name="P25" xml:id="id109" draw:id="id109" draw:layer="layout" svg:width="4.762cm" svg:height="2.54cm" svg:x="13.669cm" svg:y="11.649cm">
          <draw:glue-point draw:id="4" svg:x="-0.726cm" svg:y="4.862cm"/>
          <draw:glue-point draw:id="5" svg:x="1.272cm" svg:y="3.614cm"/>
          <draw:glue-point draw:id="6" svg:x="0.39cm" svg:y="-4.051cm"/>
          <text:p text:style-name="P24"><text:span text:style-name="T1">LORD</text:span></text:p>
          <text:p text:style-name="P24"><text:span text:style-name="T19">1Sa 9:15,16</text:span></text:p>
          <text:p text:style-name="P24"><text:span text:style-name="T19">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6" draw:text-style-name="P16" xml:id="id115" draw:id="id115" draw:layer="layout" svg:width="3.81cm" svg:height="3.175cm" svg:x="5.237cm" svg:y="80.24cm">
          <draw:glue-point draw:id="8" svg:x="-2.876cm" svg:y="-4.998cm"/>
          <draw:glue-point draw:id="9" svg:x="4.569cm" svg:y="-4.519cm"/>
          <text:p text:style-name="P15"><text:span text:style-name="T13">Pharaoh-nechoh</text:span></text:p>
          <text:p text:style-name="P15"><text:span text:style-name="T13">king of Egypt</text:span></text:p>
          <text:p text:style-name="P15"><text:span text:style-name="T14">2Ki 23:34</text:span></text:p>
          <text:p text:style-name="P15"><text:span text:style-name="T20">Necho</text:span></text:p>
          <text:p text:style-name="P15"><text:span text:style-name="T10">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7" draw:text-style-name="P27" xml:id="id74" draw:id="id74" draw:layer="layout" svg:width="3.175cm" svg:height="2.032cm" svg:x="19.113cm" svg:y="41.663cm">
          <draw:glue-point draw:id="8" svg:x="2.893cm" svg:y="5.27cm"/>
          <text:p text:style-name="P26"><text:span text:style-name="T6">Jehoram</text:span></text:p>
          <text:p text:style-name="P26"><text:span text:style-name="T21">2Ki 1:17</text:span></text:p>
          <text:p text:style-name="P26"><text:span text:style-name="T6">Joram</text:span></text:p>
          <text:p text:style-name="P26"><text:span text:style-name="T22">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8" draw:text-style-name="P27" xml:id="id75" draw:id="id75" draw:layer="layout" svg:width="3.175cm" svg:height="1.778cm" svg:x="23.139cm" svg:y="41.791cm">
          <draw:glue-point draw:id="8" svg:x="2.406cm" svg:y="-5.07cm"/>
          <text:p text:style-name="P26"><text:span text:style-name="T23">Ahaziah</text:span></text:p>
          <text:p text:style-name="P26"><text:span text:style-name="T2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9" draw:text-style-name="P27" xml:id="id77" draw:id="id77" draw:layer="layout" svg:width="3.175cm" svg:height="1.778cm" svg:x="21.076cm" svg:y="37.481cm">
          <draw:glue-point draw:id="8" svg:x="5.001cm" svg:y="-2.232cm"/>
          <draw:glue-point draw:id="9" svg:x="5.001cm" svg:y="2.019cm"/>
          <text:p text:style-name="P26"><text:span text:style-name="T6">Ahab</text:span></text:p>
          <text:p text:style-name="P26"><text:span text:style-name="T22">1Ki 16:2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0" draw:text-style-name="P29" xml:id="id76" draw:id="id76" draw:layer="layout" svg:width="3.175cm" svg:height="1.778cm" svg:x="21.076cm" svg:y="34.223cm">
          <draw:glue-point draw:id="8" svg:x="-1.064cm" svg:y="5cm"/>
          <text:p text:style-name="P28"><text:span text:style-name="T6">Omri</text:span></text:p>
          <text:p text:style-name="P28"><text:span text:style-name="T2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1" draw:text-style-name="P12" xml:id="id73" draw:id="id73" draw:layer="layout" svg:width="3.175cm" svg:height="1.778cm" svg:x="8.161cm" svg:y="43.784cm">
          <draw:glue-point draw:id="8" svg:x="3.902cm" svg:y="-5cm"/>
          <text:p text:style-name="P2"><text:span text:style-name="T24">Athaliah</text:span></text:p>
          <text:p text:style-name="P2"><text:span text:style-name="T5">2Ki 8:18, 11:1</text:span></text:p>
          <text:p text:style-name="P2"><text:span text:style-name="T5">2Ch 22: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2" draw:text-style-name="P30" xml:id="id87" draw:id="id87" draw:layer="layout" svg:width="3.175cm" svg:height="1.778cm" svg:x="21.074cm" svg:y="23.026cm">
          <draw:glue-point draw:id="8" svg:x="-1.811cm" svg:y="-5cm"/>
          <text:p text:style-name="P8"><text:span text:style-name="T6">Nadab</text:span></text:p>
          <text:p text:style-name="P8"><text:span text:style-name="T7">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3" draw:text-style-name="P30" xml:id="id82" draw:id="id82" draw:layer="layout" svg:width="3.175cm" svg:height="1.778cm" svg:x="21.074cm" svg:y="25.524cm">
          <draw:glue-point draw:id="8" svg:x="-1.975cm" svg:y="5cm"/>
          <text:p text:style-name="P8"><text:span text:style-name="T6">Baasha</text:span></text:p>
          <text:p text:style-name="P8"><text:span text:style-name="T7">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4" draw:text-style-name="P30" xml:id="id83" draw:id="id83" draw:layer="layout" svg:width="3.175cm" svg:height="1.778cm" svg:x="21.074cm" svg:y="28.184cm">
          <text:p text:style-name="P8"><text:span text:style-name="T6">Elah</text:span></text:p>
          <text:p text:style-name="P8"><text:span text:style-name="T7">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5" draw:text-style-name="P30" xml:id="id107" draw:id="id107" draw:layer="layout" svg:width="3.175cm" svg:height="1.778cm" svg:x="21.074cm" svg:y="30.919cm">
          <text:p text:style-name="P8"><text:span text:style-name="T6">Zimri</text:span></text:p>
          <text:p text:style-name="P8"><text:span text:style-name="T7">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6" draw:text-style-name="P29" xml:id="id106" draw:id="id106" draw:layer="layout" svg:width="3.175cm" svg:height="1.778cm" svg:x="25.421cm" svg:y="34.226cm">
          <text:p text:style-name="P28"><text:span text:style-name="T6">Tibni</text:span></text:p>
          <text:p text:style-name="P28"><text:span text:style-name="T2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7" draw:text-style-name="P27" xml:id="id99" draw:id="id99" draw:layer="layout" svg:width="3.175cm" svg:height="1.778cm" svg:x="19.112cm" svg:y="44.719cm">
          <text:p text:style-name="P26"><text:span text:style-name="T6">Jehu</text:span></text:p>
          <text:p text:style-name="P26"><text:span text:style-name="T2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8" draw:text-style-name="P27" xml:id="id100" draw:id="id100" draw:layer="layout" svg:width="3.175cm" svg:height="1.778cm" svg:x="19.112cm" svg:y="47.569cm">
          <draw:glue-point draw:id="8" svg:x="2.406cm" svg:y="-5.07cm"/>
          <text:p text:style-name="P26"><text:span text:style-name="T6">Jehoahaz</text:span></text:p>
          <text:p text:style-name="P26"><text:span text:style-name="T2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29" draw:text-style-name="P27" xml:id="id101" draw:id="id101" draw:layer="layout" svg:width="3.175cm" svg:height="2.032cm" svg:x="19.112cm" svg:y="50.358cm">
          <draw:glue-point draw:id="8" svg:x="2.406cm" svg:y="-5.07cm"/>
          <draw:glue-point draw:id="9" svg:x="-2.211cm" svg:y="-5cm"/>
          <text:p text:style-name="P26"><text:span text:style-name="T6">Joash</text:span></text:p>
          <text:p text:style-name="P26"><text:span text:style-name="T22">2Ki 13:9</text:span></text:p>
          <text:p text:style-name="P26"><text:span text:style-name="T25">Jehoash</text:span></text:p>
          <text:p text:style-name="P26"><text:span text:style-name="T2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0" draw:text-style-name="P27" xml:id="id103" draw:id="id103" draw:layer="layout" svg:width="3.175cm" svg:height="1.778cm" svg:x="19.115cm" svg:y="55.437cm">
          <draw:glue-point draw:id="8" svg:x="2.406cm" svg:y="-5.07cm"/>
          <text:p text:style-name="P26"><text:span text:style-name="T6">Zachariah</text:span></text:p>
          <text:p text:style-name="P26"><text:span text:style-name="T2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1" draw:text-style-name="P27" xml:id="id102" draw:id="id102" draw:layer="layout" svg:width="3.175cm" svg:height="1.778cm" svg:x="19.116cm" svg:y="53.007cm">
          <draw:glue-point draw:id="8" svg:x="2.406cm" svg:y="-5.07cm"/>
          <draw:glue-point draw:id="9" svg:x="-1.811cm" svg:y="-5cm"/>
          <text:p text:style-name="P26"><text:span text:style-name="T6">Jeroboam</text:span></text:p>
          <text:p text:style-name="P26"><text:span text:style-name="T2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2" draw:text-style-name="P27" xml:id="id105" draw:id="id105" draw:layer="layout" svg:width="3.175cm" svg:height="1.778cm" svg:x="19.115cm" svg:y="57.838cm">
          <draw:glue-point draw:id="8" svg:x="2.406cm" svg:y="-5.07cm"/>
          <text:p text:style-name="P26"><text:span text:style-name="T6">Shallum</text:span></text:p>
          <text:p text:style-name="P26"><text:span text:style-name="T2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3" draw:text-style-name="P27" xml:id="id97" draw:id="id97" draw:layer="layout" svg:width="3.175cm" svg:height="1.778cm" svg:x="19.115cm" svg:y="60.253cm">
          <draw:glue-point draw:id="8" svg:x="2.406cm" svg:y="-5.07cm"/>
          <text:p text:style-name="P26"><text:span text:style-name="T6">Menahem</text:span></text:p>
          <text:p text:style-name="P26"><text:span text:style-name="T2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4" draw:text-style-name="P27" xml:id="id98" draw:id="id98" draw:layer="layout" svg:width="3.175cm" svg:height="1.778cm" svg:x="19.117cm" svg:y="62.754cm">
          <draw:glue-point draw:id="8" svg:x="2.406cm" svg:y="-5.07cm"/>
          <text:p text:style-name="P26"><text:span text:style-name="T6">Pekahiah</text:span></text:p>
          <text:p text:style-name="P26"><text:span text:style-name="T2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5" draw:text-style-name="P27" xml:id="id104" draw:id="id104" draw:layer="layout" svg:width="3.175cm" svg:height="1.778cm" svg:x="19.12cm" svg:y="65.355cm">
          <draw:glue-point draw:id="8" svg:x="2.406cm" svg:y="-5.07cm"/>
          <text:p text:style-name="P26"><text:span text:style-name="T6">Pekah</text:span></text:p>
          <text:p text:style-name="P26"><text:span text:style-name="T22">2Ki 15:25,27</text:span></text:p>
          <text:p text:style-name="P26"><text:span text:style-name="T2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6" draw:text-style-name="P27" xml:id="id79" draw:id="id79" draw:layer="layout" svg:width="3.175cm" svg:height="1.778cm" svg:x="19.121cm" svg:y="68.266cm">
          <draw:glue-point draw:id="8" svg:x="2.406cm" svg:y="-5.07cm"/>
          <text:p text:style-name="P26"><text:span text:style-name="T6">Hoshea</text:span></text:p>
          <text:p text:style-name="P26"><text:span text:style-name="T2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7" draw:text-style-name="P16" xml:id="id80" draw:id="id80" draw:layer="layout" svg:width="3.861cm" svg:height="1.778cm" svg:x="18.778cm" svg:y="71.598cm">
          <text:p text:style-name="P15"><text:span text:style-name="T13">Shalmaneser king of Assyria</text:span></text:p>
          <text:p text:style-name="P15"><text:span text:style-name="T14">2Ki 17:1-18:11</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8" draw:text-style-name="P31" xml:id="id81" draw:id="id81" draw:layer="layout" svg:width="4.064cm" svg:height="3.556cm" svg:x="18.677cm" svg:y="75.001cm">
          <text:p text:style-name="P2"><text:span text:style-name="T26">Men from Babylon, Cuthah, Ava, Hamath, &amp; Sepharvaim</text:span></text:p>
          <text:p text:style-name="P2"><text:span text:style-name="T10">2Ki 17:2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9" draw:text-style-name="P11" xml:id="id126" draw:id="id126" draw:layer="layout" svg:width="3.175cm" svg:height="2.083cm" svg:x="7.467cm" svg:y="36.761cm">
          <text:p text:style-name="P10"><text:span text:style-name="T11">Elder</text:span></text:p>
          <text:p text:style-name="P10"><text:span text:style-name="T9">Ahaziah</text:span></text:p>
          <text:p text:style-name="P10"><text:span text:style-name="T10">2Ki 9:29</text:span></text:p>
          <text:p text:style-name="P10"><text:span text:style-name="T10">2Ch 22:2-5,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5" draw:text-style-name="P1" draw:layer="layout" draw:type="line" svg:x1="9.054cm" svg:y1="38.844cm" svg:x2="9.054cm" svg:y2="39.472cm" draw:start-shape="id126" draw:start-glue-point="2" draw:end-shape="id88" draw:end-glue-point="4" svg:d="M9054 38844v628" svg:viewBox="0 0 1 629">
          <text:p/>
        </draw:connector>
        <draw:custom-shape draw:style-name="gr140" draw:text-style-name="P14" xml:id="id71" draw:id="id71" draw:layer="layout" svg:width="3.15cm" svg:height="5.537cm" svg:x="14.24cm" svg:y="80.23cm">
          <draw:glue-point draw:id="8" svg:x="-2.126cm" svg:y="-5cm"/>
          <draw:glue-point draw:id="9" svg:x="-5cm" svg:y="3.545cm"/>
          <text:p text:style-name="P13"><text:span text:style-name="T11">Elder</text:span></text:p>
          <text:p text:style-name="P13"><text:span text:style-name="T9">Jehoiachin</text:span></text:p>
          <text:p text:style-name="P13"><text:span text:style-name="T10">2Ki 24:12-14</text:span></text:p>
          <text:p text:style-name="P13"><text:span text:style-name="T10">2Ch 36:9,10</text:span></text:p>
          <text:p text:style-name="P13"><text:span text:style-name="T9">Jeconiah</text:span></text:p>
          <text:p text:style-name="P13"><text:span text:style-name="T10">2Ki 24:12</text:span></text:p>
          <text:p text:style-name="P13"><text:span text:style-name="T10">Jer 24:1, 29:2</text:span></text:p>
          <text:p text:style-name="P13"><text:span text:style-name="T9">Coniah</text:span></text:p>
          <text:p text:style-name="P13"><text:span text:style-name="T10">Jer 22:24,28</text:span></text:p>
          <text:p text:style-name="P13"><text:span text:style-name="T9">Jeconias</text:span></text:p>
          <text:p text:style-name="P13"><text:span text:style-name="T10">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3" draw:text-style-name="P1" draw:layer="layout" draw:type="curve" svg:x1="13.695cm" svg:y1="78.292cm" svg:x2="15.815cm" svg:y2="80.23cm" draw:start-shape="id68" draw:start-glue-point="2" draw:end-shape="id71" draw:end-glue-point="4" svg:d="M13695 78292c0 1453 2120 485 2120 1938" svg:viewBox="0 0 2121 1939">
          <text:p/>
        </draw:connector>
        <draw:custom-shape draw:style-name="gr141" draw:text-style-name="P33" xml:id="id78" draw:id="id78" draw:layer="layout" svg:width="3.175cm" svg:height="1.778cm" svg:x="24.816cm" svg:y="37.482cm">
          <draw:glue-point draw:id="8" svg:x="3.902cm" svg:y="-5cm"/>
          <text:p text:style-name="P32"><text:span text:style-name="T27">Athaliah</text:span></text:p>
          <text:p text:style-name="P32"><text:span text:style-name="T28">2Ch 18:1,2</text:span></text:p>
          <text:p text:style-name="P32"><text:span text:style-name="T28">2Ch 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marker draw:name="Arrowheads_20_4" draw:display-name="Arrowheads 4" svg:viewBox="0 0 20 13" svg:d="M0 13l10-13 10 13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Gabriela Nerd Font" fo:font-family="'Gabriela Nerd Font'" style:font-style-name="Regular" style:font-pitch="variable" fo:font-size="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Gabriela Nerd Font" fo:font-family="'Gabriela Nerd Font'" style:font-style-name="Regular" style:font-pitch="variable" fo:font-size="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30.48cm" fo:page-height="91.44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29T08:58:09.242000000</meta:creation-date>
    <dc:date>2026-07-11T12:32:18.828941757</dc:date>
    <meta:editing-duration>P3DT2H40M57S</meta:editing-duration>
    <meta:editing-cycles>1337</meta:editing-cycles>
    <meta:generator>LibreOffice/26.2.4.2$Linux_X86_64 LibreOffice_project/64a984c51f4702dbd3710b13428c673a2f1292e7</meta:generator>
    <meta:print-date>2025-07-23T13:31:01.795118500</meta:print-date>
    <meta:printed-by>PDF files</meta:printed-by>
    <dc:title>Kings of Judah and Israel</dc:title>
    <meta:document-statistic meta:object-count="294"/>
  </office:meta>
</office:document-meta>
</file>