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color="#800080" draw:marker-end="Arrowheads_20_13" draw:marker-end-width="0.3cm" svg:stroke-opacity="100%" draw:fill="none" draw:textarea-vertical-align="middle" loext:decorative="false"/>
    </style:style>
    <style:style style:name="gr3" style:family="graphic" style:parent-style-name="standard">
      <style:graphic-properties draw:stroke="dash" draw:stroke-dash="Dot" svg:stroke-color="#000000" draw:marker-start="Concave_20_short" draw:marker-start-width="0.3cm" draw:textarea-horizontal-align="lef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fill="none" draw:textarea-horizontal-align="right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ff0000" draw:textarea-horizontal-align="justify" draw:textarea-vertical-align="top" draw:auto-grow-height="false" fo:min-height="2.272cm" fo:min-width="2.53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draw:textarea-horizontal-align="justify" draw:textarea-vertical-align="middle" draw:auto-grow-height="false" fo:min-height="5.615cm" fo:min-width="2.6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start="Concave_20_short" draw:marker-end="Concave_20_short" draw:fill="none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729fcf" draw:fill="solid" draw:fill-color="#fff5ce" draw:textarea-horizontal-align="center" draw:textarea-vertical-align="middle" draw:auto-grow-height="tru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.018cm" svg:stroke-color="#bf0041" draw:marker-start="Concave_20_short" draw:marker-start-width="0.327cm" draw:marker-end-width="0.227cm" svg:stroke-linecap="butt" draw:textarea-horizontal-align="lef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0" style:family="graphic" style:parent-style-name="standard">
      <style:graphic-properties draw:stroke="solid" draw:stroke-dash="Dot" svg:stroke-color="#ff0000" draw:fill="solid" draw:fill-color="#729fcf" draw:textarea-horizontal-align="justify" draw:textarea-vertical-align="top" draw:auto-grow-height="false" fo:min-height="2.272cm" fo:min-width="2.53cm" style:writing-mode="lr-tb" loext:decorative="false"/>
      <style:paragraph-properties style:writing-mode="lr-tb"/>
    </style:style>
    <style:style style:name="gr11" style:family="graphic" style:parent-style-name="objectwithoutfill" style:list-style-name="L1">
      <style:graphic-properties draw:stroke="dash" draw:stroke-dash="Dash" svg:stroke-width="0.018cm" svg:stroke-color="#bf0041" draw:marker-start="Concave_20_short" draw:marker-start-width="0.227cm" draw:marker-end-width="0.227cm" svg:stroke-linecap="butt" draw:fill="none" draw:textarea-horizontal-align="righ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cm" fo:min-width="5.79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color="#000000" draw:marker-start="Concave_20_short" draw:marker-end="" draw:fill="none" draw:textarea-horizontal-align="left" draw:textarea-vertical-align="middle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" svg:stroke-color="#ff0000" draw:fill-color="#fff5ce" draw:textarea-horizontal-align="left" draw:textarea-vertical-align="middle" fo:min-height="0cm" fo:min-width="0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018cm" svg:stroke-color="#bf0041" draw:marker-start="Concave_20_short" draw:marker-start-width="0.227cm" draw:marker-end="Concave_20_short" draw:marker-end-width="0.227cm" svg:stroke-linecap="butt" draw:fill="none" draw:textarea-horizontal-align="righ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6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color="#ff0000" draw:fill="solid" draw:fill-color="#5983b0" draw:textarea-horizontal-align="justify" draw:textarea-vertical-align="middle" draw:auto-grow-height="false" fo:min-height="0cm" fo:min-width="2.644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color="#000000" draw:fill="none" draw:textarea-horizontal-align="left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000000" draw:marker-start="Arrowheads_20_14" draw:marker-end="" draw:fill="none" draw:textarea-horizontal-align="right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000000" draw:marker-start="" draw:marker-end="" draw:fill="none" draw:textarea-horizontal-align="right" draw:textarea-vertical-align="middle" loext:decorative="false"/>
      <style:paragraph-properties style:writing-mode="lr-tb"/>
    </style:style>
    <style:style style:name="gr21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gr22" style:family="graphic" style:parent-style-name="objectwithoutfill" style:list-style-name="L1">
      <style:graphic-properties draw:stroke="dash" draw:stroke-dash="Dot" svg:stroke-color="#000000" draw:marker-start="Concave_20_short" draw:fill="none" draw:textarea-horizontal-align="right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color="#ff0000" draw:fill="solid" draw:fill-color="#5983b0" draw:textarea-horizontal-align="justify" draw:textarea-vertical-align="middle" draw:auto-grow-height="false" fo:min-height="0cm" fo:min-width="1.678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draw:marker-start="" draw:marker-end="Concave_20_short" draw:fill="none" draw:textarea-horizontal-align="right" draw:textarea-vertical-align="middle" loext:decorative="false"/>
      <style:paragraph-properties style:writing-mode="lr-tb"/>
    </style:style>
    <style:style style:name="gr25" style:family="graphic" style:parent-style-name="objectwithoutfill" style:list-style-name="L1">
      <style:graphic-properties draw:stroke="dash" draw:stroke-dash="Dot" svg:stroke-color="#000000" draw:marker-start="Concave_20_short" draw:fill="none" draw:textarea-horizontal-align="left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Dot" svg:stroke-color="#729fcf" draw:marker-end="Arrowheads_20_8" draw:marker-end-width="0.3cm" svg:stroke-opacity="100%" draw:fill="none" draw:textarea-vertical-align="middle" loext:decorative="false"/>
    </style:style>
    <style:style style:name="gr27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6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start"/>
      <style:text-properties fo:font-size="6pt" style:font-size-asian="8pt" style:font-size-complex="8pt"/>
    </style:style>
    <style:style style:name="P5" style:family="paragraph">
      <loext:graphic-properties draw:fill="none"/>
      <style:paragraph-properties fo:text-align="end"/>
      <style:text-properties fo:color="#000000" loext:opacity="100%" style:font-name="Ubuntu1" fo:font-size="4pt" style:font-size-asian="10pt" style:font-size-complex="10pt"/>
    </style:style>
    <style:style style:name="P6" style:family="paragraph">
      <loext:graphic-properties draw:fill="none"/>
      <style:paragraph-properties fo:text-align="end"/>
      <style:text-properties fo:color="#000000" loext:opacity="100%" style:font-name="Ubuntu1" fo:font-size="6pt" style:font-size-asian="6pt" style:font-size-complex="6pt"/>
    </style:style>
    <style:style style:name="P7" style:family="paragraph">
      <style:paragraph-properties fo:text-align="center"/>
      <style:text-properties fo:color="#000000" loext:opacity="100%" style:font-name="Ubuntu1" fo:font-size="10pt" style:font-size-asian="10pt" style:font-size-complex="10pt"/>
    </style:style>
    <style:style style:name="P8" style:family="paragraph"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style:font-name="Ubuntu1" fo:font-size="4pt" style:font-size-asian="10pt" style:font-size-complex="10pt"/>
    </style:style>
    <style:style style:name="P14" style:family="paragraph">
      <style:paragraph-properties fo:text-align="center"/>
      <style:text-properties fo:font-size="6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8pt" style:font-size-complex="8pt"/>
    </style:style>
    <style:style style:name="P16" style:family="paragraph">
      <loext:graphic-properties draw:fill="solid" draw:fill-color="#fff5ce"/>
      <style:paragraph-properties fo:text-align="center" style:writing-mode="lr-tb"/>
      <style:text-properties fo:font-size="6pt" style:font-size-asian="8pt" style:font-size-complex="8pt"/>
    </style:style>
    <style:style style:name="P17" style:family="paragraph">
      <loext:graphic-properties draw:fill="none"/>
      <style:paragraph-properties fo:text-align="end"/>
      <style:text-properties fo:color="#000000" loext:opacity="100%" style:font-name="Ubuntu1" fo:font-size="6pt" style:font-size-asian="10pt" style:font-size-complex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loext:opacity="100%" style:font-name="Ubuntu1" fo:font-size="6pt" style:font-size-asian="10pt" style:font-size-complex="10pt"/>
    </style:style>
    <style:style style:name="P21" style:family="paragraph">
      <style:paragraph-properties fo:text-align="center"/>
      <style:text-properties fo:font-size="4pt" style:font-size-asian="5pt" style:font-size-complex="5pt"/>
    </style:style>
    <style:style style:name="P22" style:family="paragraph">
      <style:paragraph-properties fo:text-align="center" style:writing-mode="lr-tb"/>
      <style:text-properties fo:font-size="4pt" style:font-size-asian="5pt" style:font-size-complex="5pt"/>
    </style:style>
    <style:style style:name="P23" style:family="paragraph">
      <style:paragraph-properties fo:text-align="start"/>
      <style:text-properties fo:font-size="5pt" style:font-size-asian="5pt" style:font-size-complex="5pt"/>
    </style:style>
    <style:style style:name="P24" style:family="paragraph">
      <loext:graphic-properties draw:fill="none"/>
      <style:paragraph-properties fo:text-align="start"/>
      <style:text-properties fo:color="#000000" loext:opacity="100%" style:font-name="Ubuntu1" fo:font-size="6pt" style:font-size-asian="10pt" style:font-size-complex="10pt"/>
    </style:style>
    <style:style style:name="P25" style:family="paragraph">
      <style:paragraph-properties fo:margin-left="0cm" fo:margin-right="0cm" fo:text-align="start" fo:text-indent="0cm"/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P26" style:family="paragraph">
      <loext:graphic-properties draw:fill-color="#fff5ce"/>
      <style:paragraph-properties fo:margin-left="0cm" fo:margin-right="0cm" fo:text-align="start" fo:text-indent="0cm" style:writing-mode="lr-tb"/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P27" style:family="paragraph">
      <style:paragraph-properties fo:margin-left="0cm" fo:margin-right="0cm" fo:text-indent="0cm"/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P28" style:family="paragraph">
      <loext:graphic-properties draw:fill-color="#fff5ce"/>
      <style:paragraph-properties fo:margin-left="0cm" fo:margin-right="0cm" fo:text-indent="0cm" style:writing-mode="lr-tb"/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P29" style:family="paragraph">
      <style:paragraph-properties fo:text-align="center"/>
      <style:text-properties fo:color="#000000" loext:opacity="100%" style:font-name="Ubuntu1" fo:font-size="4pt" style:font-size-asian="8pt" style:font-size-complex="8pt"/>
    </style:style>
    <style:style style:name="P30" style:family="paragraph">
      <loext:graphic-properties draw:fill="solid" draw:fill-color="#5983b0"/>
      <style:paragraph-properties fo:text-align="center" style:writing-mode="lr-tb"/>
      <style:text-properties fo:color="#000000" loext:opacity="100%" style:font-name="Ubuntu1" fo:font-size="4pt" style:font-size-asian="8pt" style:font-size-complex="8pt"/>
    </style:style>
    <style:style style:name="P31" style:family="paragraph">
      <style:paragraph-properties fo:text-align="start"/>
      <style:text-properties fo:font-size="4pt" style:font-size-asian="8pt" style:font-size-complex="8pt"/>
    </style:style>
    <style:style style:name="P32" style:family="paragraph">
      <style:paragraph-properties fo:text-align="start"/>
      <style:text-properties fo:font-size="6pt" style:font-size-asian="6pt" style:font-size-complex="6pt"/>
    </style:style>
    <style:style style:name="P33" style:family="paragraph">
      <loext:graphic-properties draw:fill="none"/>
      <style:paragraph-properties fo:text-align="start"/>
      <style:text-properties fo:color="#000000" loext:opacity="100%" style:font-name="Ubuntu1" fo:font-size="4pt" style:font-size-asian="10pt" style:font-size-complex="10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loext:opacity="100%" style:font-name="Ubuntu1" fo:font-size="6pt" style:font-size-asian="4pt" style:font-size-complex="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loext:opacity="100%" style:font-name="Ubuntu1" fo:font-size="4pt" style:font-size-asian="4pt" style:font-size-complex="4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style:font-name="Ubuntu1" fo:font-size="6pt" style:font-size-asian="4pt" style:font-size-complex="4pt"/>
    </style:style>
    <style:style style:name="T1" style:family="text">
      <style:text-properties fo:color="#000000" loext:opacity="100%" fo:font-size="6pt" fo:font-style="normal" style:text-underline-style="none" fo:font-weight="normal" style:font-size-asian="8pt" style:font-size-complex="8pt"/>
    </style:style>
    <style:style style:name="T2" style:family="text">
      <style:text-properties fo:color="#000000" loext:opacity="100%" style:text-position="super 58%" fo:font-size="6pt" fo:font-style="normal" style:text-underline-style="none" fo:font-weight="normal" style:font-size-asian="8pt" style:font-size-complex="8pt"/>
    </style:style>
    <style:style style:name="T3" style:family="text">
      <style:text-properties fo:color="#000000" loext:opacity="100%" style:font-name="Ubuntu1" fo:font-size="4pt" fo:font-style="normal" style:text-underline-style="none" fo:font-weight="normal" style:font-size-asian="10pt" style:font-size-complex="10pt"/>
    </style:style>
    <style:style style:name="T4" style:family="text">
      <style:text-properties fo:color="#000000" loext:opacity="100%" style:font-name="Ubuntu1" fo:font-size="6pt" fo:font-style="normal" style:text-underline-style="none" fo:font-weight="normal" style:font-size-asian="6pt" style:font-size-complex="6pt"/>
    </style:style>
    <style:style style:name="T5" style:family="text">
      <style:text-properties fo:color="#000000" loext:opacity="100%" style:font-name="Ubuntu1" fo:font-size="10pt" fo:font-style="normal" style:text-underline-style="none" fo:font-weight="normal" style:font-size-asian="10pt" style:font-size-complex="10pt"/>
    </style:style>
    <style:style style:name="T6" style:family="text">
      <style:text-properties fo:color="#000000" loext:opacity="100%" fo:font-size="10pt" fo:font-style="normal" style:text-underline-style="none" fo:font-weight="normal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position="super 58%" style:font-name="Ubuntu1" fo:font-size="4pt" fo:font-style="normal" style:text-underline-style="none" fo:font-weight="normal" style:font-size-asian="10pt" style:font-size-complex="10pt"/>
    </style:style>
    <style:style style:name="T11" style:family="text">
      <style:text-properties fo:color="#000000" loext:opacity="100%" fo:font-size="6pt" fo:font-style="normal" style:text-underline-style="none" fo:font-weight="normal" style:font-size-asian="6pt" style:font-size-complex="6pt"/>
    </style:style>
    <style:style style:name="T12" style:family="text">
      <style:text-properties fo:color="#000000" loext:opacity="100%" style:font-name="Ubuntu1" fo:font-size="6pt" fo:font-style="normal" style:text-underline-style="none" fo:font-weight="normal" style:font-size-asian="10pt" style:font-size-complex="10pt"/>
    </style:style>
    <style:style style:name="T13" style:family="text">
      <style:text-properties fo:color="#000000" loext:opacity="100%" style:font-name="Ubuntu1" fo:font-size="6pt" fo:font-style="normal" style:text-underline-style="none" fo:font-weight="normal" style:font-size-asian="4pt" style:font-size-complex="4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4pt" fo:font-style="normal" style:text-underline-style="none" fo:font-weight="normal" style:font-size-asian="5pt" style:font-size-complex="5pt"/>
    </style:style>
    <style:style style:name="T17" style:family="text">
      <style:text-properties fo:color="#000000" loext:opacity="100%" fo:font-size="5pt" fo:font-style="normal" style:text-underline-style="none" fo:font-weight="normal" style:font-size-asian="5pt" style:font-size-complex="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position="super 58%" style:font-name="Ubuntu1" fo:font-size="6pt" fo:font-style="normal" style:text-underline-style="none" fo:font-weight="normal" style:font-size-asian="10pt" style:font-size-complex="10pt"/>
    </style:style>
    <style:style style:name="T21" style:family="text"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T22" style:family="text">
      <style:text-properties style:font-name="Ubuntu" fo:font-size="6pt" style:letter-kerning="true" fo:background-color="#ffdbb6" style:font-name-asian="Microsoft YaHei" style:font-size-asian="5pt" style:font-name-complex="Arial" style:font-size-complex="5pt"/>
    </style:style>
    <style:style style:name="T23" style:family="text"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T24" style:family="text">
      <style:text-properties style:font-name="Ubuntu" fo:font-size="6pt" style:letter-kerning="true" fo:background-color="#ffdbb6" style:font-name-asian="Microsoft YaHei" style:font-size-asian="8pt" style:font-name-complex="Arial" style:font-size-complex="8pt"/>
    </style:style>
    <style:style style:name="T25" style:family="text">
      <style:text-properties fo:color="#000000" loext:opacity="100%" style:font-name="Ubuntu1" fo:font-size="4pt" fo:font-style="normal" style:text-underline-style="none" fo:font-weight="normal" style:font-size-asian="8pt" style:font-size-complex="8pt"/>
    </style:style>
    <style:style style:name="T26" style:family="text">
      <style:text-properties fo:color="#000000" loext:opacity="100%" fo:font-size="4pt" fo:font-style="normal" style:text-underline-style="none" fo:font-weight="normal" style:font-size-asian="8pt" style:font-size-complex="8pt"/>
    </style:style>
    <style:style style:name="T27" style:family="text">
      <style:text-properties fo:color="#000000" loext:opacity="100%" style:text-position="super 58%" fo:font-size="4pt" fo:font-style="normal" style:text-underline-style="none" fo:font-weight="normal" style:font-size-asian="8pt" style:font-size-complex="8pt"/>
    </style:style>
    <style:style style:name="T28" style:family="text">
      <style:text-properties fo:color="#000000" loext:opacity="100%" fo:font-size="4pt" fo:font-style="normal" style:text-underline-style="none" fo:font-weight="normal" style:font-size-asian="4pt" style:font-size-complex="4pt"/>
    </style:style>
    <style:style style:name="T29" style:family="text">
      <style:text-properties fo:color="#000000" loext:opacity="100%" style:text-position="super 58%" fo:font-size="4pt" fo:font-style="normal" style:text-underline-style="none" fo:font-weight="normal" style:font-size-asian="5pt" style:font-size-complex="5pt"/>
    </style:style>
    <style:style style:name="T30" style:family="text">
      <style:text-properties fo:color="#000000" loext:opacity="100%" style:text-position="super 58%" fo:font-size="6pt" fo:font-style="normal" style:text-underline-style="none" fo:font-weight="normal" style:font-size-asian="6pt" style:font-size-complex="6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Ubuntu1" fo:font-size="4pt" fo:font-style="normal" style:text-underline-style="none" fo:font-weight="normal" style:font-size-asian="4pt" style:font-size-complex="4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6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6pt" fo:font-style="normal" style:text-underline-style="none" fo:font-weight="normal" style:font-size-asian="5pt" style:font-size-complex="5pt"/>
    </style:style>
    <style:style style:name="T36" style:family="text">
      <style:text-properties fo:color="#000000" loext:opacity="100%" style:text-position="super 58%" fo:font-size="6pt" fo:font-style="normal" style:text-underline-style="none" fo:font-weight="normal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5.538cm" svg:y1="9.981cm" svg:x2="5.845cm" svg:y2="9.981cm" draw:start-shape="id1" draw:start-glue-point="1" draw:end-shape="id2" draw:end-glue-point="3" svg:d="M5538 9981h307" svg:viewBox="0 0 308 1">
            <text:p/>
          </draw:connector>
          <draw:connector draw:style-name="gr2" draw:text-style-name="P1" draw:layer="layout" draw:type="curve" draw:line-skew="0.658cm" svg:x1="12.974cm" svg:y1="18.062cm" svg:x2="12.319cm" svg:y2="12.963cm" draw:start-shape="id3" draw:start-glue-point="1" draw:end-shape="id4" draw:end-glue-point="1" svg:d="M12974 18062c1737 0 2064-5099-655-5099" svg:viewBox="0 0 2002 5100">
            <text:p/>
          </draw:connector>
          <draw:line draw:style-name="gr3" draw:text-style-name="P4" draw:layer="layout" svg:x1="5.592cm" svg:y1="14.096cm" svg:x2="9.758cm" svg:y2="14.096cm">
            <text:p text:style-name="P2"><text:span text:style-name="T1"><text:s text:c="4"/>7</text:span><text:span text:style-name="T2">th</text:span><text:span text:style-name="T1"> year <text:s text:c="3"/>2Ch 36:6, Jer </text:span><text:span text:style-name="T1">52:28</text:span></text:p>
            <text:p text:style-name="P3"><text:span text:style-name="T1"><text:s/></text:span></text:p>
          </draw:line>
          <draw:line draw:style-name="gr4" draw:text-style-name="P5" draw:layer="layout" svg:x1="14.82cm" svg:y1="14.285cm" svg:x2="15.633cm" svg:y2="14.285cm">
            <text:p text:style-name="P3"><text:span text:style-name="T3"/></text:p>
            <text:p text:style-name="P3"><text:span text:style-name="T3">Age: 8</text:span></text:p>
          </draw:line>
          <draw:line draw:style-name="gr4" draw:text-style-name="P6" draw:layer="layout" svg:x1="11.282cm" svg:y1="11.565cm" svg:x2="13.365cm" svg:y2="11.565cm">
            <text:p text:style-name="P3"><text:span text:style-name="T4"/></text:p>
            <text:p text:style-name="P3"><text:span text:style-name="T4">Age: 25</text:span></text:p>
          </draw:line>
          <draw:custom-shape draw:style-name="gr5" draw:text-style-name="P8" xml:id="id4" draw:id="id4" draw:layer="layout" svg:width="3.302cm" svg:height="2.794cm" svg:x="9.017cm" svg:y="11.566cm">
            <draw:glue-point draw:id="4" svg:x="5.006cm" svg:y="3.582cm"/>
            <text:p text:style-name="P7"><text:span text:style-name="T5">Eliakim/Jehoiakim</text:span></text:p>
            <text:p text:style-name="P7"><text:span text:style-name="T5">11yrs</text:span></text:p>
            <text:p text:style-name="P7"><text:span text:style-name="T5">2Ki 23:34,36</text:span></text:p>
            <text:p text:style-name="P7"><text:span text:style-name="T5">2Ch 36:4,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" draw:text-style-name="P10" draw:layer="layout" svg:width="3.175cm" svg:height="5.865cm" svg:x="2.417cm" svg:y="12.329cm">
            <text:p text:style-name="P9"><text:span text:style-name="T6">Nebuchadnezzar</text:span></text:p>
            <text:p text:style-name="P9"><text:span text:style-name="T6">king of Babylo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5.592cm" svg:y1="12.572cm" svg:x2="9.009cm" svg:y2="12.572cm">
            <text:p text:style-name="P11"><text:span text:style-name="T7"/></text:p>
            <text:p text:style-name="P12"><text:span text:style-name="T8">1</text:span><text:span text:style-name="T9">st</text:span><text:span text:style-name="T8"> year <text:s text:c="7"/></text:span><text:span text:style-name="T7">Jer 25:1, 36:1, 45:1, </text:span><text:span text:style-name="T7">46:2 <text:s text:c="5"/></text:span><text:span text:style-name="T8"><text:s text:c="2"/></text:span><text:span text:style-name="T3">4</text:span><text:span text:style-name="T10">th</text:span><text:span text:style-name="T3"> year</text:span></text:p>
          </draw:line>
          <draw:custom-shape draw:style-name="gr8" draw:text-style-name="P16" xml:id="id5" draw:id="id5" draw:layer="layout" svg:width="3.171cm" svg:height="0.727cm" svg:x="5.75cm" svg:y="15.628cm">
            <draw:glue-point draw:id="4" svg:x="-2.986cm" svg:y="-4.993cm"/>
            <text:p text:style-name="P14"><text:span text:style-name="T1">Babylonian captivity begins</text:span></text:p>
            <text:p text:style-name="P15"><text:span text:style-name="T11">2Ch 36:9,10, Jer 29:1,2,10</text:span></text:p>
            <draw:enhanced-geometry svg:viewBox="0 0 21600 21600" draw:type="rectangle" draw:enhanced-path="M 0 0 L 21600 0 21600 21600 0 21600 0 0 Z N"/>
          </draw:custom-shape>
          <draw:line draw:style-name="gr9" draw:text-style-name="P4" xml:id="id6" draw:id="id6" draw:layer="layout" svg:x1="5.593cm" svg:y1="14.361cm" svg:x2="9.555cm" svg:y2="14.361cm">
            <draw:glue-point draw:id="4" svg:x="-1.923cm" svg:y="0cm"/>
            <text:p text:style-name="P2"><text:span text:style-name="T1"/></text:p>
            <text:p text:style-name="P3"><text:span text:style-name="T1"><text:s text:c="4"/>8</text:span><text:span text:style-name="T2">th</text:span><text:span text:style-name="T1"> year <text:s text:c="6"/>2Ki 24:12, 2Ch </text:span><text:span text:style-name="T1">36:10 </text:span></text:p>
          </draw:line>
          <draw:line draw:style-name="gr4" draw:text-style-name="P17" draw:layer="layout" svg:x1="11.446cm" svg:y1="14.361cm" svg:x2="13.326cm" svg:y2="14.361cm">
            <text:p text:style-name="P3"><text:span text:style-name="T12"/></text:p>
            <text:p text:style-name="P3"><text:span text:style-name="T13">Age: 21 </text:span></text:p>
          </draw:line>
          <draw:custom-shape draw:style-name="gr10" draw:text-style-name="P18" draw:layer="layout" svg:width="3.302cm" svg:height="2.794cm" svg:x="9.016cm" svg:y="14.361cm">
            <text:p text:style-name="P7"><text:span text:style-name="T5">Mattaniah/Zedekiah</text:span></text:p>
            <text:p text:style-name="P7"><text:span text:style-name="T5">11yrs</text:span></text:p>
            <text:p text:style-name="P7"><text:span text:style-name="T5">2Ki 24:17,18</text:span></text:p>
            <text:p text:style-name="P7"><text:span text:style-name="T5">2Ch 36:10,11</text:span></text:p>
            <text:p text:style-name="P7"><text:span text:style-name="T5">Jer 52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1" draw:text-style-name="P20" draw:layer="layout" svg:x1="12.318cm" svg:y1="16.636cm" svg:x2="17.144cm" svg:y2="16.636cm">
            <text:p text:style-name="P19"><text:span text:style-name="T14">9</text:span><text:span text:style-name="T15">th</text:span><text:span text:style-name="T14"> year, 10</text:span><text:span text:style-name="T15">th</text:span><text:span text:style-name="T14"> month, 10</text:span><text:span text:style-name="T15">th</text:span><text:span text:style-name="T14"> day</text:span></text:p>
            <text:p text:style-name="P19"><text:span text:style-name="T14"><text:s/>3</text:span><text:span text:style-name="T15">rd</text:span><text:span text:style-name="T14"> Siege of Jerusalem begins 2Ki 25:1, Jer 39:1</text:span></text:p>
          </draw:line>
          <draw:custom-shape draw:style-name="gr12" draw:text-style-name="P22" draw:layer="layout" svg:width="6.299cm" svg:height="0.051cm" svg:x="9.218cm" svg:y="17.156cm">
            <text:p text:style-name="P21"><text:span text:style-name="T16"/></text:p>
            <text:p text:style-name="P21"><text:span text:style-name="T16"/></text:p>
            <text:p text:style-name="P21"><text:span text:style-name="T16">Gedaliah 2 months in Mizpah of Judah 2Ki 25:1,2,8,22,23,25, Jer 40:6,12</text:span></text:p>
            <draw:enhanced-geometry svg:viewBox="0 0 21600 21600" draw:type="rectangle" draw:enhanced-path="M 0 0 L 21600 0 21600 21600 0 21600 0 0 Z N"/>
          </draw:custom-shape>
          <draw:line draw:style-name="gr3" draw:text-style-name="P23" draw:layer="layout" svg:x1="5.59cm" svg:y1="17.156cm" svg:x2="9.603cm" svg:y2="17.156cm">
            <text:p text:style-name="P2"><text:span text:style-name="T17"/></text:p>
            <text:p text:style-name="P2"><text:span text:style-name="T18"><text:s text:c="3"/>19</text:span><text:span text:style-name="T19">th</text:span><text:span text:style-name="T18"> year </text:span><text:span text:style-name="T17">2Ki 25:8-</text:span><text:span text:style-name="T17">22, Nubuzaradan sent </text:span><text:span text:style-name="T17"><text:s text:c="10"/></text:span></text:p>
          </draw:line>
          <draw:line draw:style-name="gr13" draw:text-style-name="P24" draw:layer="layout" svg:x1="12.347cm" svg:y1="12.601cm" svg:x2="17.529cm" svg:y2="12.601cm">
            <text:p text:style-name="P2"><text:span text:style-name="T12"><text:s text:c="3"/>4</text:span><text:span text:style-name="T20">th</text:span><text:span text:style-name="T12"> year, Burns the letter from </text:span><text:span text:style-name="T12">Jeremiah</text:span></text:p>
            <text:p text:style-name="P3"><text:span text:style-name="T12">Jer 36 <text:s text:c="63"/></text:span><text:span text:style-name="T12"><text:s/></text:span></text:p>
          </draw:line>
          <draw:custom-shape draw:style-name="gr14" draw:text-style-name="P26" draw:layer="layout" svg:width="3.076cm" svg:height="2.384cm" svg:x="16.567cm" svg:y="12.601cm">
            <text:p text:style-name="P25"><text:span text:style-name="T21">Jeremiah 36:30</text:span></text:p>
            <text:p text:style-name="P25"><text:span text:style-name="T21">Therefore thus saith the LORD of </text:span><text:span text:style-name="T22">Jehoiakim king of Judah; He shall have none to sit upon the throne of David</text:span><text:span text:style-name="T21">: and his dead body shall be cast out in the day to the heat, and in the night to the frost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0" draw:layer="layout" svg:x1="5.593cm" svg:y1="12.318cm" svg:x2="9.01cm" svg:y2="12.318cm">
            <text:p text:style-name="P19"><text:span text:style-name="T14">Dan 1:1, 2Ki 24:1 <text:s text:c="13"/></text:span><text:span text:style-name="T12">3</text:span><text:span text:style-name="T20">rd</text:span><text:span text:style-name="T12"> year </text:span></text:p>
            <text:p text:style-name="P3"><text:span text:style-name="T12"/></text:p>
          </draw:line>
          <draw:custom-shape draw:style-name="gr16" draw:text-style-name="P28" xml:id="id2" draw:id="id2" draw:layer="layout" svg:width="3.422cm" svg:height="2.858cm" svg:x="5.845cm" svg:y="8.552cm">
            <draw:glue-point draw:id="4" svg:x="-5cm" svg:y="4.483cm"/>
            <text:p text:style-name="P27"><text:span text:style-name="T23">Which Jehoiachin does the name “Coniah” refer to? Definitely the elder.</text:span></text:p>
            <text:p text:style-name="P27"><text:span text:style-name="T23"/></text:p>
            <text:p text:style-name="P27"><text:span text:style-name="T23">Jeremiah 22:28</text:span></text:p>
            <text:p text:style-name="P27"><text:span text:style-name="T23">Is this man Coniah a despised broken idol? is he a vessel wherein is no pleasure? wherefore are they cast out, he and </text:span><text:span text:style-name="T24">his seed</text:span><text:span text:style-name="T23">, and are cast into a land which they know not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0" draw:layer="layout" svg:width="3.15cm" svg:height="0.076cm" svg:x="11.716cm" svg:y="14.284cm">
            <draw:glue-point draw:id="4" svg:x="4.574cm" svg:y="-5cm"/>
            <text:p text:style-name="P29"><text:span text:style-name="T25">Jehoiachin 3m 10d 2Ki 24:12, 2Ch 36:9,10</text:span></text:p>
            <text:p text:style-name="P29"><text:span text:style-name="T2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3" draw:text-style-name="P31" draw:layer="layout" svg:x1="5.588cm" svg:y1="16.89cm" svg:x2="12.265cm" svg:y2="16.89cm">
            <text:p text:style-name="P2"><text:span text:style-name="T26"><text:s text:c="3"/>18</text:span><text:span text:style-name="T27">th</text:span><text:span text:style-name="T26"> year <text:s text:c="7"/></text:span><text:span text:style-name="T28">Jer 32:1, 52:29 <text:s text:c="7"/>i</text:span><text:span text:style-name="T16">n the 10</text:span><text:span text:style-name="T29">th</text:span><text:span text:style-name="T16"> year</text:span></text:p>
            <text:p text:style-name="P2"><text:span text:style-name="T26"/></text:p>
          </draw:line>
          <draw:line draw:style-name="gr3" draw:text-style-name="P32" draw:layer="layout" svg:x1="5.592cm" svg:y1="18.18cm" svg:x2="7.98cm" svg:y2="18.18cm">
            <text:p text:style-name="P2"><text:span text:style-name="T11"><text:s text:c="3"/>23</text:span><text:span text:style-name="T30">rd</text:span><text:span text:style-name="T11"> year Jer </text:span><text:span text:style-name="T11">52:30</text:span></text:p>
            <text:p text:style-name="P2"><text:span text:style-name="T11"/></text:p>
          </draw:line>
          <draw:line draw:style-name="gr18" draw:text-style-name="P33" draw:layer="layout" svg:x1="11.124cm" svg:y1="14.284cm" svg:x2="11.463cm" svg:y2="14.284cm">
            <text:p text:style-name="P2"><text:span text:style-name="T3"/></text:p>
            <text:p text:style-name="P2"><text:span text:style-name="T3">Age: 18</text:span></text:p>
          </draw:line>
          <draw:line draw:style-name="gr19" draw:text-style-name="P6" draw:layer="layout" svg:x1="12.348cm" svg:y1="12.084cm" svg:x2="18.596cm" svg:y2="12.084cm">
            <text:p text:style-name="P3"><text:span text:style-name="T4"><text:s text:c="3"/>Younger </text:span><text:span text:style-name="T4">Jehoiachin </text:span><text:span text:style-name="T4">born</text:span></text:p>
            <text:p text:style-name="P3"><text:span text:style-name="T4"><text:s text:c="3"/></text:span><text:span text:style-name="T4">Jehoiakim </text:span><text:span text:style-name="T4">age: 27</text:span></text:p>
          </draw:line>
          <draw:line draw:style-name="gr20" draw:text-style-name="P6" draw:layer="layout" svg:x1="10.848cm" svg:y1="9.544cm" svg:x2="14.861cm" svg:y2="9.544cm">
            <text:p text:style-name="P3"><text:span text:style-name="T4"><text:s text:c="3"/>Elder Jehoiachin born</text:span></text:p>
            <text:p text:style-name="P3"><text:span text:style-name="T4"><text:s text:c="3"/>Jehoiakim age: 17</text:span></text:p>
          </draw:line>
          <draw:custom-shape draw:style-name="gr21" draw:text-style-name="P28" xml:id="id1" draw:id="id1" draw:layer="layout" svg:width="3.464cm" svg:height="2.783cm" svg:x="2.074cm" svg:y="8.59cm">
            <draw:glue-point draw:id="4" svg:x="-5cm" svg:y="4.483cm"/>
            <draw:glue-point draw:id="5" svg:x="-4.287cm" svg:y="-3.165cm"/>
            <draw:glue-point draw:id="6" svg:x="-5cm" svg:y="-4.292cm"/>
            <draw:glue-point draw:id="7" svg:x="-1.781cm" svg:y="5cm"/>
            <text:p text:style-name="P27"><text:span text:style-name="T23">Which Jehoiachin does the name “Jeconiah” refer to? Likely also the elder.</text:span></text:p>
            <text:p text:style-name="P27"><text:span text:style-name="T23"/></text:p>
            <text:p text:style-name="P27"><text:span text:style-name="T23">“Jeconiah” H3659</text:span></text:p>
            <text:p text:style-name="P27"><text:span text:style-name="T23"/></text:p>
            <text:p text:style-name="P27"><text:span text:style-name="T23">כׇּנְיָהוּ</text:span><text:span text:style-name="T23"> </text:span><text:span text:style-name="T23">(Konyâhûw | kon-yaw'-hoo)</text:span></text:p>
            <text:p text:style-name="P27"><text:span text:style-name="T23">Derivation: for </text:span><text:span text:style-name="T23">יְכׇנְיָה</text:span><text:span text:style-name="T23"> </text:span><text:span text:style-name="T23">(H3204)</text:span></text:p>
            <text:p text:style-name="P27"><text:span text:style-name="T23">Strong's: Conjah, an Israelite king</text:span></text:p>
            <text:p text:style-name="P27"><text:span text:style-name="T23">KJV: Coniah.</text:span></text:p>
            <draw:enhanced-geometry svg:viewBox="0 0 21600 21600" draw:type="rectangle" draw:enhanced-path="M 0 0 L 21600 0 21600 21600 0 21600 0 0 Z N"/>
          </draw:custom-shape>
          <draw:line draw:style-name="gr22" draw:text-style-name="P34" draw:layer="layout" svg:x1="11.887cm" svg:y1="17.155cm" svg:x2="17.881cm" svg:y2="17.155cm">
            <text:p text:style-name="P19"><text:span text:style-name="T13">Age: 32 <text:s text:c="66"/></text:span><text:span text:style-name="T13"><text:s text:c="27"/></text:span></text:p>
            <text:p text:style-name="P19"><text:span text:style-name="T31"><text:s text:c="16"/>Jer 52:5, </text:span><text:span text:style-name="T13">Eze 5:2, 40:1</text:span></text:p>
          </draw:line>
          <draw:custom-shape draw:style-name="gr23" draw:text-style-name="P30" xml:id="id7" draw:id="id7" draw:layer="layout" svg:width="2.184cm" svg:height="0.076cm" svg:x="9.019cm" svg:y="14.284cm">
            <draw:glue-point draw:id="4" svg:x="-4.4cm" svg:y="-5cm"/>
            <text:p text:style-name="P29"><text:span text:style-name="T25">Jehoiachin 3m 2Ki 24:8,15</text:span></text:p>
            <text:p text:style-name="P29"><text:span text:style-name="T2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4" draw:text-style-name="P35" draw:layer="layout" svg:x1="5.592cm" svg:y1="15.371cm" svg:x2="9.009cm" svg:y2="15.371cm">
            <text:p text:style-name="P19"><text:span text:style-name="T32"/></text:p>
            <text:p text:style-name="P19"><text:span text:style-name="T7">12</text:span><text:span text:style-name="T33">th</text:span><text:span text:style-name="T7"> </text:span><text:span text:style-name="T7">year <text:s text:c="3"/></text:span><text:span text:style-name="T7"><text:s text:c="13"/></text:span><text:span text:style-name="T7"><text:s text:c="9"/></text:span><text:span text:style-name="T7">4</text:span><text:span text:style-name="T33">th</text:span><text:span text:style-name="T7"> </text:span><text:span text:style-name="T7">year, </text:span><text:span text:style-name="T7">5</text:span><text:span text:style-name="T33">th</text:span><text:span text:style-name="T7"> </text:span><text:span text:style-name="T7">mont</text:span><text:span text:style-name="T7">h </text:span><text:span text:style-name="T32">Jer </text:span><text:span text:style-name="T32">28:1</text:span></text:p>
          </draw:line>
          <draw:line draw:style-name="gr25" draw:text-style-name="P37" draw:layer="layout" svg:x1="12.319cm" svg:y1="15.366cm" svg:x2="13.741cm" svg:y2="15.366cm">
            <text:p text:style-name="P36"><text:span text:style-name="T31">4</text:span><text:span text:style-name="T34">th</text:span><text:span text:style-name="T31"> year Jer </text:span><text:span text:style-name="T31">51:59</text:span></text:p>
            <text:p text:style-name="P36"><text:span text:style-name="T31"/></text:p>
          </draw:line>
          <draw:line draw:style-name="gr9" draw:text-style-name="P4" draw:layer="layout" svg:x1="5.592cm" svg:y1="16.638cm" svg:x2="12.318cm" svg:y2="16.636cm">
            <text:p text:style-name="P2"><text:span text:style-name="T35"><text:s text:c="4"/>17</text:span><text:span text:style-name="T36">th</text:span><text:span text:style-name="T35"> year</text:span></text:p>
            <text:p text:style-name="P2"><text:span text:style-name="T1"/></text:p>
          </draw:line>
          <draw:connector draw:style-name="gr26" draw:text-style-name="P1" draw:layer="layout" draw:type="curve" svg:x1="6.389cm" svg:y1="15.629cm" svg:x2="6.813cm" svg:y2="14.361cm" draw:start-shape="id5" draw:start-glue-point="4" draw:end-shape="id6" draw:end-glue-point="4" svg:d="M6389 15629c0-777 424-143 424-1268" svg:viewBox="0 0 425 1269">
            <text:p/>
          </draw:connector>
          <draw:custom-shape draw:style-name="gr27" draw:text-style-name="P28" xml:id="id3" draw:id="id3" draw:layer="layout" svg:width="4.591cm" svg:height="0.725cm" svg:x="8.383cm" svg:y="17.7cm">
            <draw:glue-point draw:id="4" svg:x="-5cm" svg:y="4.483cm"/>
            <draw:glue-point draw:id="5" svg:x="-4.287cm" svg:y="-3.165cm"/>
            <draw:glue-point draw:id="6" svg:x="-5cm" svg:y="-4.292cm"/>
            <draw:glue-point draw:id="7" svg:x="-1.781cm" svg:y="5cm"/>
            <text:p text:style-name="P27"><text:span text:style-name="T23">Jehoiakim &amp; both Jehoiachin’s are carried away to Babylon in the same year.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curve" draw:line-skew="-0.08cm" svg:x1="7.556cm" svg:y1="11.41cm" svg:x2="9.151cm" svg:y2="14.284cm" draw:start-shape="id2" draw:start-glue-point="2" draw:end-shape="id7" draw:end-glue-point="4" svg:d="M7556 11410c0 1963 1595 527 1595 2874" svg:viewBox="0 0 1596 287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Arrowheads_20_14" draw:display-name="Arrowheads 14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13:52:27.753762100</meta:creation-date>
    <dc:date>2025-08-04T15:20:34.001990100</dc:date>
    <meta:editing-duration>PT4H11M16S</meta:editing-duration>
    <meta:editing-cycles>49</meta:editing-cycles>
    <meta:generator>LibreOffice/25.2.4.3$Windows_X86_64 LibreOffice_project/33e196637044ead23f5c3226cde09b47731f7e27</meta:generator>
    <meta:document-statistic meta:object-count="35"/>
  </office:meta>
</office:document-meta>
</file>