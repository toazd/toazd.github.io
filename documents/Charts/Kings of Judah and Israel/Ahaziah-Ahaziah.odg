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 style:parent-style-name="objectwithoutfill" style:list-style-name="L1">
      <style:graphic-properties draw:stroke="dash" draw:stroke-dash="Dot" svg:stroke-color="#000000" svg:stroke-linecap="butt" draw:fill="none" draw:textarea-horizontal-align="right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t" svg:stroke-color="#000000" svg:stroke-linecap="butt" draw:fill="none" draw:textarea-horizontal-align="right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right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ash" svg:stroke-color="#000000" svg:stroke-linecap="butt" draw:fill="none" draw:textarea-vertical-align="middle" loext:decorative="false"/>
    </style:style>
    <style:style style:name="gr6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left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draw:marker-end="" svg:stroke-linecap="butt" draw:fill="none" draw:textarea-horizontal-align="left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color="#000000" draw:fill="solid" draw:fill-color="#ec9ba4" draw:textarea-horizontal-align="justify" draw:textarea-vertical-align="middle" draw:auto-grow-height="false" fo:min-height="1.126cm" fo:min-width="2.654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.21cm" fo:min-width="2.551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color="#000000" draw:marker-end="" svg:stroke-linecap="butt" draw:fill="none" draw:textarea-horizontal-align="right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t" svg:stroke-color="#000000" svg:stroke-linecap="butt" draw:fill="none" draw:textarea-horizontal-align="right" draw:textarea-vertical-align="top" loext:decorative="false"/>
      <style:paragraph-properties style:writing-mode="lr-tb"/>
    </style:style>
    <style:style style:name="gr12" style:family="graphic" style:parent-style-name="standard">
      <style:graphic-properties draw:stroke="solid" draw:stroke-dash="Dot" svg:stroke-color="#ff0000" draw:opacity="100%" draw:textarea-horizontal-align="justify" draw:textarea-vertical-align="middle" draw:auto-grow-height="false" fo:min-height="2.502cm" fo:min-width="2.506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3.746cm" fo:min-width="2.48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ot" svg:stroke-color="#000000" draw:marker-start="Concave_20_short" draw:marker-end="" svg:stroke-linecap="butt" draw:fill="none" draw:textarea-horizontal-align="left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right" draw:textarea-vertical-align="top" loext:decorative="false"/>
      <style:paragraph-properties style:writing-mode="lr-tb"/>
    </style:style>
    <style:style style:name="gr16" style:family="graphic" style:parent-style-name="standard">
      <style:graphic-properties draw:stroke="solid" draw:stroke-dash="Dot" svg:stroke-color="#000000" draw:fill="solid" draw:fill-color="#729fcf" draw:textarea-horizontal-align="justify" draw:textarea-vertical-align="middle" draw:auto-grow-height="false" fo:min-height="0cm" fo:min-width="2.851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draw:stroke-dash="Dot" svg:stroke-color="#729fcf" draw:fill-color="#fff5ce" draw:textarea-horizontal-align="justify" draw:textarea-vertical-align="middle" draw:auto-grow-height="false" fo:min-height="0.888cm" fo:min-width="2.43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draw:stroke-dash="Dot" svg:stroke-color="#729fcf" draw:fill="solid" draw:fill-color="#fff5ce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9" style:family="graphic" style:parent-style-name="objectwithoutfill" style:list-style-name="L1">
      <style:graphic-properties draw:stroke="dash" draw:stroke-dash="Dot" svg:stroke-color="#000000" draw:marker-start="Concave_20_short" svg:stroke-linecap="butt" draw:fill="none" draw:textarea-horizontal-align="left" draw:textarea-vertical-align="middle" loext:decorative="false"/>
      <style:paragraph-properties style:writing-mode="lr-tb"/>
    </style:style>
    <style:style style:name="gr20" style:family="graphic" style:parent-style-name="standard">
      <style:graphic-properties draw:stroke="dash" draw:stroke-dash="Dot" svg:stroke-color="#000000" draw:marker-start="Concave_20_short" draw:marker-start-width="0.3cm" draw:marker-end="Concave_20_short" draw:marker-end-width="0.3cm" draw:textarea-vertical-align="middle" loext:decorative="false"/>
      <style:paragraph-properties style:writing-mode="lr-tb"/>
    </style:style>
    <style:style style:name="gr21" style:family="graphic" style:parent-style-name="objectwithoutfill" style:list-style-name="L1">
      <style:graphic-properties draw:stroke="dash" draw:stroke-dash="Dot" svg:stroke-color="#000000" svg:stroke-linecap="butt" draw:fill="none" draw:textarea-horizontal-align="right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stroke="solid" draw:stroke-dash="Dot" svg:stroke-color="#000000" draw:fill="solid" draw:fill-color="#ec9ba4" draw:textarea-horizontal-align="justify" draw:textarea-vertical-align="middle" draw:auto-grow-height="false" fo:min-height="1.126cm" fo:min-width="2.243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draw:stroke-dash="Dot" svg:stroke-color="#729fcf" draw:fill="solid" draw:fill-color="#fff5ce" draw:textarea-horizontal-align="left" draw:textarea-vertical-align="middle" draw:auto-grow-height="true" fo:min-height="0cm" fo:min-width="0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ot" svg:stroke-color="#729fcf" draw:fill-color="#fff5ce" draw:textarea-horizontal-align="left" draw:textarea-vertical-align="middle" draw:auto-grow-height="true" fo:min-height="0cm" fo:min-width="0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stroke="solid" draw:stroke-dash="Dash_20_Dot_20_4" svg:stroke-color="#729fcf" draw:marker-start="" draw:marker-end="Arrowheads_20_13" draw:marker-end-width="0.3cm" draw:fill="none" draw:textarea-vertical-align="middle" loext:decorative="false"/>
    </style:style>
    <style:style style:name="gr26" style:family="graphic" style:parent-style-name="standard">
      <style:graphic-properties draw:stroke="dash" draw:stroke-dash="Dot" svg:stroke-color="#000000" draw:marker-start="" draw:marker-start-width="0.3cm" draw:marker-end="" draw:marker-end-width="0.3cm" svg:stroke-linecap="butt" draw:textarea-vertical-align="middle" loext:decorative="false"/>
      <style:paragraph-properties style:writing-mode="lr-tb"/>
    </style:style>
    <style:style style:name="gr27" style:family="graphic" style:parent-style-name="objectwithoutfill">
      <style:graphic-properties svg:stroke-color="#729fcf" draw:marker-end="Arrowheads_20_13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fill="none" draw:textarea-vertical-align="middle" loext:decorative="false"/>
    </style:style>
    <style:style style:name="gr29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middle" loext:decorative="false"/>
      <style:paragraph-properties style:writing-mode="lr-tb"/>
    </style:style>
    <style:style style:name="gr30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5.016cm" fo:min-width="2.48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9.588cm" fo:min-width="2.48cm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6.54cm" fo:min-width="2.48cm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.21cm" fo:min-width="2.871cm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9.842cm" fo:min-width="2.48cm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5.524cm" fo:min-width="2.48cm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.21cm" fo:min-width="3.364cm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5.778cm" fo:min-width="2.48cm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draw:stroke-dash="Dot" svg:stroke-color="#000000" draw:textarea-horizontal-align="justify" draw:textarea-vertical-align="top" draw:auto-grow-height="false" fo:min-height="1.584cm" fo:min-width="2.604cm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cm" fo:min-width="2.626cm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cm" fo:min-width="2.93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ff0000" draw:marker-end="Arrowheads_20_13" draw:marker-end-width="0.3cm" svg:stroke-opacity="50%" draw:fill="none" draw:textarea-vertical-align="middle" loext:decorative="false"/>
    </style:style>
    <style:style style:name="gr42" style:family="graphic" style:parent-style-name="objectwithoutfill">
      <style:graphic-properties draw:stroke="dash" draw:stroke-dash="Dot" svg:stroke-color="#000000" draw:marker-start="Concave_20_short" svg:stroke-linecap="butt" draw:fill="none" draw:textarea-horizontal-align="left" draw:textarea-vertical-align="middle" loext:decorative="false"/>
      <style:paragraph-properties style:writing-mode="lr-tb"/>
    </style:style>
    <style:style style:name="gr43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center" draw:textarea-vertical-align="middle" loext:decorative="false"/>
      <style:paragraph-properties style:writing-mode="lr-tb"/>
    </style:style>
    <style:style style:name="gr44" style:family="graphic" style:parent-style-name="objectwithoutfill">
      <style:graphic-properties draw:stroke="solid" draw:stroke-dash="Dash_20_Dot_20_4" svg:stroke-color="#ff0000" draw:marker-start="" draw:marker-end="Arrowheads_20_13" draw:marker-end-width="0.3cm" svg:stroke-opacity="50%" draw:fill="none" draw:textarea-vertical-align="middle" loext:decorative="false"/>
    </style:style>
    <style:style style:name="gr45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2.502cm" fo:min-width="2.506cm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cm" fo:min-width="2.219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color="#2a6099" draw:marker-end="Arrowheads_20_13" draw:marker-end-width="0.3cm" draw:fill="none" draw:textarea-vertical-align="middle" loext:decorative="false"/>
    </style:style>
    <style:style style:name="gr48" style:family="graphic" style:parent-style-name="objectwithoutfill">
      <style:graphic-properties draw:stroke="dash" draw:stroke-dash="Dot" svg:stroke-color="#000000" draw:marker-start-width="0.3cm" draw:marker-end-width="0.3cm" draw:fill="solid" draw:textarea-vertical-align="middle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righ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right" fo:text-indent="0cm"/>
      <style:text-properties fo:color="#000000" loext:opacity="100%" style:font-name="Ubuntu1" fo:font-size="6pt" style:font-size-asian="6pt" style:font-size-complex="6pt"/>
    </style:style>
    <style:style style:name="P3" style:family="paragraph">
      <style:paragraph-properties fo:text-align="right"/>
    </style:style>
    <style:style style:name="P4" style:family="paragraph">
      <loext:graphic-properties draw:fill="none"/>
      <style:paragraph-properties fo:text-align="right"/>
      <style:text-properties fo:color="#000000" loext:opacity="100%" style:font-name="Ubuntu1" fo:font-size="6pt" style:font-size-asian="6pt" style:font-size-complex="6pt"/>
    </style:style>
    <style:style style:name="P5" style:family="paragraph">
      <loext:graphic-properties draw:fill="none"/>
      <style:paragraph-properties fo:text-align="center"/>
      <style:text-properties fo:font-size="6pt"/>
    </style:style>
    <style:style style:name="P6" style:family="paragraph">
      <style:paragraph-properties fo:text-align="left"/>
    </style:style>
    <style:style style:name="P7" style:family="paragraph">
      <loext:graphic-properties draw:fill="none"/>
      <style:paragraph-properties fo:text-align="left"/>
      <style:text-properties fo:color="#000000" loext:opacity="100%" style:font-name="Ubuntu1" fo:font-size="6pt" style:font-size-asian="6pt" style:font-size-complex="6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000000" loext:opacity="100%" style:font-name="Ubuntu1" fo:font-size="6pt" style:font-size-asian="6pt" style:font-size-complex="6pt"/>
    </style:style>
    <style:style style:name="P10" style:family="paragraph">
      <style:paragraph-properties fo:text-align="center"/>
      <style:text-properties fo:color="#000000" loext:opacity="100%" style:font-name="Ubuntu1" fo:font-size="6pt" style:font-size-asian="8pt" style:font-size-complex="8pt"/>
    </style:style>
    <style:style style:name="P11" style:family="paragraph">
      <loext:graphic-properties draw:fill="solid" draw:fill-color="#ec9ba4"/>
      <style:paragraph-properties fo:text-align="center" style:writing-mode="lr-tb"/>
      <style:text-properties fo:color="#000000" loext:opacity="100%" style:font-name="Ubuntu1" fo:font-size="6pt" style:font-size-asian="8pt" style:font-size-complex="8pt"/>
    </style:style>
    <style:style style:name="P12" style:family="paragraph">
      <style:paragraph-properties fo:text-align="center"/>
      <style:text-properties fo:color="#000000" loext:opacity="100%" style:font-name="Ubuntu1" fo:font-size="8pt" style:font-size-asian="10pt" style:font-size-complex="10pt"/>
    </style:style>
    <style:style style:name="P13" style:family="paragraph">
      <style:paragraph-properties fo:text-align="center" style:writing-mode="lr-tb"/>
      <style:text-properties fo:color="#000000" loext:opacity="100%" style:font-name="Ubuntu1" fo:font-size="8pt" style:font-size-asian="10pt" style:font-size-complex="10pt"/>
    </style:style>
    <style:style style:name="P14" style:family="paragraph">
      <style:paragraph-properties fo:text-align="center"/>
      <style:text-properties fo:color="#000000" loext:opacity="100%" style:font-name="Ubuntu1" fo:font-size="11pt" style:font-size-asian="10pt" style:font-size-complex="10pt"/>
    </style:style>
    <style:style style:name="P15" style:family="paragraph">
      <loext:graphic-properties draw:opacity="100%"/>
      <style:paragraph-properties fo:text-align="center" style:writing-mode="lr-tb"/>
      <style:text-properties fo:color="#000000" loext:opacity="100%" style:font-name="Ubuntu1" fo:font-size="11pt" style:font-size-asian="10pt" style:font-size-complex="10pt"/>
    </style:style>
    <style:style style:name="P16" style:family="paragraph">
      <style:paragraph-properties fo:text-align="center"/>
      <style:text-properties fo:color="#000000" loext:opacity="100%" style:font-name="Ubuntu1" fo:font-size="12pt" style:font-size-asian="10pt" style:font-size-complex="10pt"/>
    </style:style>
    <style:style style:name="P17" style:family="paragraph">
      <style:paragraph-properties fo:text-align="center" style:writing-mode="lr-tb"/>
      <style:text-properties fo:color="#000000" loext:opacity="100%" style:font-name="Ubuntu1" fo:font-size="12pt" style:font-size-asian="10pt" style:font-size-complex="10pt"/>
    </style:style>
    <style:style style:name="P18" style:family="paragraph">
      <loext:graphic-properties draw:fill="solid" draw:fill-color="#729fcf"/>
      <style:paragraph-properties fo:text-align="center" style:writing-mode="lr-tb"/>
      <style:text-properties fo:color="#000000" loext:opacity="100%" style:font-name="Ubuntu1" fo:font-size="6pt" style:font-size-asian="8pt" style:font-size-complex="8pt"/>
    </style:style>
    <style:style style:name="P19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0" style:family="paragraph">
      <loext:graphic-properties draw:fill-color="#fff5ce"/>
      <style:paragraph-properties fo:margin-left="0cm" fo:margin-right="0cm" fo:text-align="center" fo:text-indent="0cm" style:writing-mode="lr-tb"/>
      <style:text-properties fo:font-size="8pt" style:font-size-asian="8pt" style:font-size-complex="8pt"/>
    </style:style>
    <style:style style:name="P21" style:family="paragraph"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solid" draw:fill-color="#fff5ce"/>
      <style:paragraph-properties fo:text-align="center" style:writing-mode="lr-tb"/>
      <style:text-properties fo:font-size="8pt" style:font-size-asian="8pt" style:font-size-complex="8pt"/>
    </style:style>
    <style:style style:name="P23" style:family="paragraph">
      <style:paragraph-properties fo:margin-left="0cm" fo:margin-right="0cm" fo:margin-top="0cm" fo:margin-bottom="0cm" fo:line-height="100%" fo:text-align="left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/>
      <style:text-properties fo:color="#000000" loext:opacity="100%" style:font-name="Ubuntu1" fo:font-size="6pt" style:font-size-asian="6pt" style:font-size-complex="6pt"/>
    </style:style>
    <style:style style:name="P25" style:family="paragraph">
      <style:paragraph-properties fo:text-align="center"/>
      <style:text-properties fo:color="#000000" loext:opacity="100%" style:font-name="Ubuntu1" fo:font-size="10pt" style:font-size-asian="10pt" style:font-size-complex="10pt"/>
    </style:style>
    <style:style style:name="P26" style:family="paragraph">
      <loext:graphic-properties draw:fill="solid" draw:fill-color="#ec9ba4"/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27" style:family="paragraph">
      <style:paragraph-properties fo:text-align="left"/>
      <style:text-properties fo:font-size="8pt" style:font-size-asian="8pt" style:font-size-complex="8pt"/>
    </style:style>
    <style:style style:name="P28" style:family="paragraph">
      <style:paragraph-properties fo:margin-left="0cm" fo:margin-right="0cm" fo:margin-top="0cm" fo:margin-bottom="0cm" fo:line-height="100%" fo:text-align="left" fo:text-indent="0cm"/>
      <style:text-properties fo:font-size="8pt" style:font-size-asian="8pt" style:font-size-complex="8pt"/>
    </style:style>
    <style:style style:name="P29" style:family="paragraph">
      <loext:graphic-properties draw:fill="solid" draw:fill-color="#fff5ce"/>
      <style:paragraph-properties fo:text-align="left" style:writing-mode="lr-tb"/>
      <style:text-properties fo:font-size="8pt" style:font-size-asian="8pt" style:font-size-complex="8pt"/>
    </style:style>
    <style:style style:name="P30" style:family="paragraph">
      <loext:graphic-properties draw:fill-color="#fff5ce"/>
      <style:paragraph-properties fo:margin-left="0cm" fo:margin-right="0cm" fo:margin-top="0cm" fo:margin-bottom="0cm" fo:line-height="100%" fo:text-align="left" fo:text-indent="0cm" style:writing-mode="lr-tb"/>
      <style:text-properties fo:font-size="8pt" style:font-size-asian="8pt" style:font-size-complex="8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center"/>
      <style:text-properties fo:font-size="6pt" style:font-size-asian="6pt" style:font-size-complex="6pt"/>
    </style:style>
    <style:style style:name="P33" style:family="paragraph">
      <style:paragraph-properties fo:text-align="center"/>
      <style:text-properties fo:color="#000000" loext:opacity="100%" style:font-name="Ubuntu1" fo:font-size="8pt" style:font-size-asian="8pt" style:font-size-complex="8pt"/>
    </style:style>
    <style:style style:name="P34" style:family="paragraph">
      <style:paragraph-properties fo:text-align="center" style:writing-mode="lr-tb"/>
      <style:text-properties fo:color="#000000" loext:opacity="100%" style:font-name="Ubuntu1" fo:font-size="8pt" style:font-size-asian="8pt" style:font-size-complex="8pt"/>
    </style:style>
    <style:style style:name="P35" style:family="paragraph"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36" style:family="paragraph">
      <style:paragraph-properties fo:text-align="center"/>
      <style:text-properties fo:color="#000000" loext:opacity="100%" style:font-name="Ubuntu1" fo:font-size="8pt" style:font-size-asian="9pt" style:font-size-complex="9pt"/>
    </style:style>
    <style:style style:name="P37" style:family="paragraph">
      <style:paragraph-properties fo:text-align="center" style:writing-mode="lr-tb"/>
      <style:text-properties fo:color="#000000" loext:opacity="100%" style:font-name="Ubuntu1" fo:font-size="8pt" style:font-size-asian="9pt" style:font-size-complex="9pt"/>
    </style:style>
    <style:style style:name="P38" style:family="paragraph">
      <style:paragraph-properties fo:text-align="center"/>
      <style:text-properties fo:color="#000000" loext:opacity="100%" style:font-name="Ubuntu1" fo:font-size="6pt" style:font-size-asian="6pt" style:font-size-complex="6pt"/>
    </style:style>
    <style:style style:name="P39" style:family="paragraph">
      <style:paragraph-properties fo:text-align="center" style:writing-mode="lr-tb"/>
      <style:text-properties fo:color="#000000" loext:opacity="100%" style:font-name="Ubuntu1" fo:font-size="6pt" style:font-size-asian="6pt" style:font-size-complex="6pt"/>
    </style:style>
    <style:style style:name="P40" style:family="paragraph">
      <style:paragraph-properties fo:text-align="center" style:writing-mode="lr-tb"/>
      <style:text-properties fo:color="#000000" loext:opacity="100%" style:font-name="Ubuntu1" fo:font-size="11pt" style:font-size-asian="10pt" style:font-size-complex="10pt"/>
    </style:style>
    <style:style style:name="P41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T1" style:family="text">
      <style:text-properties fo:color="#000000" loext:opacity="100%" style:font-name="Ubuntu1" fo:font-size="6pt" style:font-size-asian="6pt" style:font-size-complex="6pt"/>
    </style:style>
    <style:style style:name="T2" style:family="text">
      <style:text-properties fo:color="#000000" loext:opacity="100%" style:font-name="Ubuntu1" fo:font-size="8pt" fo:font-style="normal" style:text-underline-style="none" fo:font-weight="normal" style:font-size-asian="8pt" style:font-size-complex="8pt"/>
    </style:style>
    <style:style style:name="T3" style:family="text">
      <style:text-properties fo:color="#000000" loext:opacity="100%" style:font-name="Ubuntu1" fo:font-size="6pt" fo:font-style="normal" style:text-underline-style="none" fo:font-weight="normal" style:font-size-asian="8pt" style:font-size-complex="8pt"/>
    </style:style>
    <style:style style:name="T4" style:family="text">
      <style:text-properties fo:color="#000000" loext:opacity="100%" style:font-name="Ubuntu1" fo:font-size="6pt" fo:font-style="normal" style:text-underline-style="none" fo:font-weight="normal" style:font-size-asian="6pt" style:font-size-complex="6pt"/>
    </style:style>
    <style:style style:name="T5" style:family="text">
      <style:text-properties fo:color="#000000" loext:opacity="100%" style:font-name="Ubuntu1" fo:font-size="8pt" fo:font-style="normal" style:text-underline-style="none" fo:font-weight="normal" style:font-size-asian="10pt" style:font-size-complex="10pt"/>
    </style:style>
    <style:style style:name="T6" style:family="text">
      <style:text-properties fo:color="#000000" loext:opacity="100%" style:font-name="Ubuntu1" fo:font-size="11pt" fo:font-style="normal" style:text-underline-style="none" fo:font-weight="normal" style:font-size-asian="10pt" style:font-size-complex="10pt"/>
    </style:style>
    <style:style style:name="T7" style:family="text">
      <style:text-properties fo:color="#000000" loext:opacity="100%" style:font-name="Ubuntu1" fo:font-size="11pt" fo:font-style="normal" style:text-underline-style="none" fo:font-weight="normal" style:font-size-asian="8pt" style:font-size-complex="8pt"/>
    </style:style>
    <style:style style:name="T8" style:family="text">
      <style:text-properties fo:color="#000000" loext:opacity="100%" style:font-name="Ubuntu1" fo:font-size="12pt" fo:font-style="normal" style:text-underline-style="none" fo:font-weight="normal" style:font-size-asian="10pt" style:font-size-complex="10pt"/>
    </style:style>
    <style:style style:name="T9" style:family="text">
      <style:text-properties fo:color="#000000" loext:opacity="100%" style:font-name="Ubuntu" fo:font-size="6pt" fo:font-style="normal" style:text-underline-style="none" fo:font-weight="normal" style:letter-kerning="true" style:font-name-asian="Microsoft YaHei" style:font-size-asian="8pt" style:font-name-complex="Arial" style:font-size-complex="8pt"/>
    </style:style>
    <style:style style:name="T10" style:family="text">
      <style:text-properties fo:color="#000000" loext:opacity="100%" fo:font-size="6pt" fo:font-style="normal" style:text-underline-style="none" fo:font-weight="normal" style:font-size-asian="8pt" style:font-size-complex="8pt"/>
    </style:style>
    <style:style style:name="T11" style:family="text">
      <style:text-properties fo:color="#000000" loext:opacity="100%" style:text-position="super 58%" fo:font-size="6pt" fo:font-style="normal" style:text-underline-style="none" fo:font-weight="normal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000000" loext:opacity="100%" style:font-name="Ubuntu1" fo:font-size="6pt" fo:font-style="normal" style:text-underline-style="none" fo:font-weight="normal" style:font-size-asian="10pt" style:font-size-complex="10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000000" loext:opacity="100%" style:font-name="Ubuntu1" fo:font-size="12pt" fo:font-style="normal" style:text-underline-style="none" fo:font-weight="normal" style:font-size-asian="8pt" style:font-size-complex="8pt"/>
    </style:style>
    <style:style style:name="T17" style:family="text">
      <style:text-properties fo:color="#000000" loext:opacity="100%" style:font-name="Ubuntu1" fo:font-size="10pt" fo:font-style="normal" style:text-underline-style="none" fo:font-weight="normal" style:font-size-asian="10pt" style:font-size-complex="10pt"/>
    </style:style>
    <style:style style:name="T18" style:family="text">
      <style:text-properties fo:color="#000000" loext:opacity="100%" style:font-name="Ubuntu1" fo:font-size="8pt" fo:font-style="normal" style:text-underline-style="none" fo:font-weight="normal" style:font-size-asian="9pt" style:font-size-complex="9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line draw:style-name="gr2" draw:text-style-name="P2" draw:layer="layout" svg:x1="13.804cm" svg:y1="20.265cm" svg:x2="15.429cm" svg:y2="20.265cm">
              <text:p text:style-name="P1"><text:span text:style-name="T1">Age: 40</text:span></text:p>
              <text:p text:style-name="P1"><text:span text:style-name="T1"/></text:p>
            </draw:line>
            <draw:line draw:style-name="gr3" draw:text-style-name="P4" draw:layer="layout" svg:x1="11.625cm" svg:y1="31.948cm" svg:x2="13.86cm" svg:y2="31.948cm">
              <text:p text:style-name="P3"><text:span text:style-name="T1">Age: 47</text:span></text:p>
              <text:p text:style-name="P3"><text:span text:style-name="T1"/></text:p>
            </draw:line>
            <draw:line draw:style-name="gr4" draw:text-style-name="P4" draw:layer="layout" svg:x1="1.842cm" svg:y1="9.594cm" svg:x2="9.31cm" svg:y2="9.594cm">
              <text:p text:style-name="P3"><text:span text:style-name="T1"/></text:p>
              <text:p text:style-name="P3"><text:span text:style-name="T1">31st year</text:span></text:p>
              <text:p text:style-name="P3"><text:span text:style-name="T1">1Ki 16:23</text:span></text:p>
              <text:p text:style-name="P3"><text:span text:style-name="T1"/></text:p>
            </draw:line>
            <draw:line draw:style-name="gr4" draw:text-style-name="P4" draw:layer="layout" svg:x1="6.145cm" svg:y1="10.864cm" svg:x2="9.284cm" svg:y2="10.864cm">
              <text:p text:style-name="P3"><text:span text:style-name="T1">36th year <text:s text:c="4"/></text:span></text:p>
              <text:p text:style-name="P3"><text:span text:style-name="T1">Baasha came up against <text:s text:c="4"/></text:span></text:p>
              <text:p text:style-name="P3"><text:span text:style-name="T1">Judah 1Ki 15:17, 2Ch 16:1 <text:s text:c="4"/></text:span></text:p>
              <text:p text:style-name="P3"><text:span text:style-name="T1"/></text:p>
            </draw:line>
            <draw:line draw:style-name="gr4" draw:text-style-name="P4" draw:layer="layout" svg:x1="6.145cm" svg:y1="11.362cm" svg:x2="9.285cm" svg:y2="11.362cm">
              <text:p text:style-name="P3"><text:span text:style-name="T1">38th year</text:span></text:p>
              <text:p text:style-name="P3"><text:span text:style-name="T1">1Ki 16:29 <text:s text:c="4"/></text:span></text:p>
            </draw:line>
            <draw:line draw:style-name="gr5" draw:text-style-name="P5" xml:id="id11" draw:id="id11" draw:layer="layout" svg:x1="7.714cm" svg:y1="7.989cm" svg:x2="7.715cm" svg:y2="10.864cm">
              <draw:glue-point draw:id="4" svg:x="10cm" svg:y="3.99cm"/>
              <text:p/>
            </draw:line>
            <draw:line draw:style-name="gr6" draw:text-style-name="P7" draw:layer="layout" svg:x1="7.314cm" svg:y1="8.566cm" svg:x2="9.285cm" svg:y2="8.567cm"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><text:s text:c="15"/>27th year</text:span></text:p>
              <text:p text:style-name="P6"><text:span text:style-name="T1"><text:s text:c="4"/>Zimri kills Elah</text:span></text:p>
              <text:p text:style-name="P6"><text:span text:style-name="T1"><text:s text:c="14"/>1Ki 16:10 <text:s text:c="4"/></text:span></text:p>
            </draw:line>
            <draw:line draw:style-name="gr7" draw:text-style-name="P9" draw:layer="layout" svg:x1="2.946cm" svg:y1="18.734cm" svg:x2="7.721cm" svg:y2="18.734cm">
              <text:p text:style-name="P8"><text:span text:style-name="T1"/></text:p>
              <text:p text:style-name="P8"><text:span text:style-name="T1">Ahaziah dies</text:span></text:p>
            </draw:line>
            <draw:custom-shape draw:style-name="gr8" draw:text-style-name="P11" draw:layer="layout" svg:width="3.302cm" svg:height="1.524cm" svg:x="9.314cm" svg:y="20.265cm">
              <text:p text:style-name="P10"><text:span text:style-name="T2">Athaliah</text:span><text:span text:style-name="T3"> (Jehoram)</text:span></text:p>
              <text:p text:style-name="P10"><text:span text:style-name="T3">daughter of Ahab</text:span></text:p>
              <text:p text:style-name="P10"><text:span text:style-name="T4">2Ki 8:18,26, 11:1-3,13,14,20, 2Ch 22:10,11, 23:12,13,21</text:span></text:p>
              <text:p text:style-name="P10"><text:span text:style-name="T4">6yrs 2Ch 22:12, 23: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9" draw:text-style-name="P13" draw:layer="layout" svg:width="3.099cm" svg:height="0.508cm" svg:x="1.264cm" svg:y="8.325cm">
              <text:p text:style-name="P12"><text:span text:style-name="T5">Elah 2yrs 1Ki 16:6,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4" draw:text-style-name="P4" draw:layer="layout" svg:x1="7.596cm" svg:y1="8.324cm" svg:x2="9.284cm" svg:y2="8.324cm">
              <text:p text:style-name="P3"><text:span text:style-name="T1">26th year</text:span></text:p>
              <text:p text:style-name="P3"><text:span text:style-name="T1">1Ki 16:8</text:span></text:p>
              <text:p text:style-name="P3"><text:span text:style-name="T1"/></text:p>
              <text:p text:style-name="P3"><text:span text:style-name="T1"/></text:p>
            </draw:line>
            <draw:line draw:style-name="gr10" draw:text-style-name="P4" draw:layer="layout" svg:x1="2.042cm" svg:y1="11.108cm" svg:x2="2.843cm" svg:y2="11.108cm">
              <text:p text:style-name="P3"><text:span text:style-name="T1"/></text:p>
              <text:p text:style-name="P3"><text:span text:style-name="T1">6yrs</text:span></text:p>
            </draw:line>
            <draw:line draw:style-name="gr3" draw:text-style-name="P4" draw:layer="layout" svg:x1="9.898cm" svg:y1="12.384cm" svg:x2="15.689cm" svg:y2="12.384cm">
              <text:p text:style-name="P3"><text:span text:style-name="T1"/></text:p>
              <text:p text:style-name="P3"><text:span text:style-name="T1">Age: 35 1Ki 22:42, 2Ch 20:31</text:span></text:p>
            </draw:line>
            <draw:line draw:style-name="gr3" draw:text-style-name="P4" draw:layer="layout" svg:x1="13.902cm" svg:y1="18.235cm" svg:x2="15.426cm" svg:y2="18.235cm">
              <text:p text:style-name="P3"><text:span text:style-name="T1">Age: 58</text:span></text:p>
              <text:p text:style-name="P3"><text:span text:style-name="T1">Age: 32</text:span></text:p>
            </draw:line>
            <draw:line draw:style-name="gr11" draw:text-style-name="P4" draw:layer="layout" svg:x1="11.624cm" svg:y1="21.79cm" svg:x2="13.859cm" svg:y2="21.79cm">
              <text:p text:style-name="P3"><text:span text:style-name="T1"/></text:p>
              <text:p text:style-name="P3"><text:span text:style-name="T1">Age: 7</text:span></text:p>
              <text:p text:style-name="P3"><text:span text:style-name="T1">2Ki 11:21</text:span></text:p>
            </draw:line>
            <draw:line draw:style-name="gr4" draw:text-style-name="P4" draw:layer="layout" svg:x1="7.608cm" svg:y1="16.708cm" svg:x2="9.312cm" svg:y2="16.708cm">
              <text:p text:style-name="P3"><text:span text:style-name="T1"><text:s text:c="8"/>17th year</text:span></text:p>
              <text:p text:style-name="P3"><text:span text:style-name="T1">1Ki 22:51</text:span></text:p>
            </draw:line>
            <draw:custom-shape draw:style-name="gr12" draw:text-style-name="P15" draw:layer="layout" svg:width="3.302cm" svg:height="3.048cm" svg:x="4.414cm" svg:y="16.963cm">
              <text:p text:style-name="P14"><text:span text:style-name="T6">Jehoram/Joram</text:span></text:p>
              <text:p text:style-name="P14"><text:span text:style-name="T6">12yrs</text:span></text:p>
              <text:p text:style-name="P14"><text:span text:style-name="T7">In Samaria</text:span></text:p>
              <text:p text:style-name="P14"><text:span text:style-name="T6">2Ki 3:1</text:span></text:p>
              <text:p text:style-name="P14"><text:span text:style-name="T6">2Ki 1:1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4" draw:text-style-name="P4" draw:layer="layout" svg:x1="6.961cm" svg:y1="16.963cm" svg:x2="9.312cm" svg:y2="16.963cm">
              <text:p text:style-name="P3"><text:span text:style-name="T1"/></text:p>
              <text:p text:style-name="P3"><text:span text:style-name="T1"/></text:p>
              <text:p text:style-name="P3"><text:span text:style-name="T1">18th year</text:span></text:p>
              <text:p text:style-name="P3"><text:span text:style-name="T1">2Ki 3:1</text:span></text:p>
            </draw:line>
            <draw:custom-shape draw:style-name="gr13" draw:text-style-name="P17" draw:layer="layout" svg:width="3.302cm" svg:height="4.318cm" svg:x="4.415cm" svg:y="27.632cm">
              <text:p text:style-name="P16"><text:span text:style-name="T8">Jehoahaz</text:span></text:p>
              <text:p text:style-name="P16"><text:span text:style-name="T8">17yrs</text:span></text:p>
              <text:p text:style-name="P16"><text:span text:style-name="T8">2Ki 13: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14" draw:text-style-name="P7" draw:layer="layout" svg:x1="7.716cm" svg:y1="21.79cm" svg:x2="10.043cm" svg:y2="21.79cm">
              <text:p text:style-name="P6"><text:span text:style-name="T1"/></text:p>
              <text:p text:style-name="P6"><text:span text:style-name="T1">7th year</text:span></text:p>
              <text:p text:style-name="P6"><text:span text:style-name="T1">2Ki 12:1</text:span></text:p>
              <text:p text:style-name="P6"><text:span text:style-name="T1">2Ch 23:1</text:span></text:p>
            </draw:line>
            <draw:line draw:style-name="gr15" draw:text-style-name="P4" draw:layer="layout" svg:x1="7.001cm" svg:y1="27.632cm" svg:x2="9.317cm" svg:y2="27.632cm">
              <text:p text:style-name="P3"><text:span text:style-name="T1"/></text:p>
              <text:p text:style-name="P3"><text:span text:style-name="T1">23rd year</text:span></text:p>
              <text:p text:style-name="P3"><text:span text:style-name="T1">2Ki 13:1</text:span></text:p>
            </draw:line>
            <draw:line draw:style-name="gr4" draw:text-style-name="P4" draw:layer="layout" svg:x1="7.717cm" svg:y1="31.188cm" svg:x2="9.317cm" svg:y2="31.188cm">
              <text:p text:style-name="P3"><text:span text:style-name="T1">14th year - 37th year</text:span></text:p>
              <text:p text:style-name="P3"><text:span text:style-name="T1">1Ki 13:10</text:span></text:p>
            </draw:line>
            <draw:custom-shape draw:style-name="gr16" draw:text-style-name="P18" draw:layer="layout" svg:width="3.353cm" svg:height="0.025cm" svg:x="4.361cm" svg:y="8.566cm">
              <text:p text:style-name="P10"><text:span text:style-name="T3"/></text:p>
              <text:p text:style-name="P10"><text:span text:style-name="T3">Zimri 7 days 1Ki 16:1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7" draw:text-style-name="P20" xml:id="id10" draw:id="id10" draw:layer="layout" svg:width="2.933cm" svg:height="1.138cm" svg:x="1.034cm" svg:y="6.794cm">
              <text:p text:style-name="P19"><text:span text:style-name="T9">Baasha survived his son Elah by at least 9 years</text:span></text:p>
              <text:p text:style-name="P19"><text:span text:style-name="T9">(2Ch 16:1 – 1Ki 16:10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22" xml:id="id5" draw:id="id5" draw:layer="layout" svg:width="2.402cm" svg:height="2.869cm" svg:x="1.725cm" svg:y="20.542cm">
              <text:p text:style-name="P21"><text:span text:style-name="T10">In order for Athaliah’s reign to end in the 7</text:span><text:span text:style-name="T11">th</text:span><text:span text:style-name="T10"> year</text:span></text:p>
              <text:p text:style-name="P21"><text:span text:style-name="T10">(2Ch 22:12, 23:1) Jehu’s reign had to begin the same year that younger Ahaziah’s reign began (because Jehu’s 7</text:span><text:span text:style-name="T11">th</text:span><text:span text:style-name="T10"> year is Joash’s first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9" draw:text-style-name="P24" draw:layer="layout" svg:x1="5.219cm" svg:y1="12.384cm" svg:x2="12.737cm" svg:y2="12.384cm">
              <text:p text:style-name="P23"><text:span text:style-name="T1"><text:s text:c="5"/>4th year</text:span></text:p>
              <text:p text:style-name="P23"><text:span text:style-name="T1"><text:s text:c="5"/>1Ki 22:41</text:span></text:p>
            </draw:line>
            <draw:line draw:style-name="gr20" draw:text-style-name="P21" draw:layer="layout" svg:x1="2.947cm" svg:y1="17.217cm" svg:x2="2.947cm" svg:y2="18.734cm">
              <text:p text:style-name="P8"><text:span text:style-name="T12">8 years</text:span></text:p>
            </draw:line>
            <draw:line draw:style-name="gr3" draw:text-style-name="P4" draw:layer="layout" svg:x1="12.615cm" svg:y1="14.423cm" svg:x2="17.238cm" svg:y2="14.423cm">
              <text:p text:style-name="P3"><text:span text:style-name="T1"/></text:p>
              <text:p text:style-name="P3"><text:span text:style-name="T1">8th year <text:s text:c="28"/>Younger Ahaziah born</text:span></text:p>
              <text:p text:style-name="P3"><text:span text:style-name="T1">Jehoram (father in law) age: 17</text:span></text:p>
              <text:p text:style-name="P3"><text:span text:style-name="T1">Jehoshaphat (grandfather in law) age: 43</text:span></text:p>
            </draw:line>
            <draw:line draw:style-name="gr21" draw:text-style-name="P2" draw:layer="layout" svg:x1="12.615cm" svg:y1="9.082cm" svg:x2="16.933cm" svg:y2="9.082cm">
              <text:p text:style-name="P1"><text:span text:style-name="T1">29th year <text:s text:c="21"/>Elder Ahaziah born </text:span></text:p>
              <text:p text:style-name="P1"><text:span text:style-name="T1">Jehoshaphat (father in law) <text:s/>age: 22 </text:span></text:p>
            </draw:line>
            <draw:custom-shape draw:style-name="gr22" draw:text-style-name="P26" xml:id="id4" draw:id="id4" draw:layer="layout" svg:width="2.891cm" svg:height="1.524cm" svg:x="16.713cm" svg:y="9.082cm">
              <text:p text:style-name="P25"><text:span text:style-name="T2">Athaliah</text:span><text:span text:style-name="T13"> (</text:span><text:span text:style-name="T3">Jehoshaphat) daughter of Omri</text:span></text:p>
              <text:p text:style-name="P25"><text:span text:style-name="T3">2Ch 18:1,2, 22:2,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3" draw:text-style-name="P29" xml:id="id7" draw:id="id7" draw:layer="layout" svg:width="3.657cm" svg:height="4.297cm" svg:x="13.932cm" svg:y="21.342cm">
              <draw:glue-point draw:id="4" svg:x="-3.231cm" svg:y="-5.004cm"/>
              <text:p text:style-name="P27"><text:span text:style-name="T10">Son in law to Jehoram (2Ki 8:27)</text:span></text:p>
              <text:p text:style-name="P27"><text:span text:style-name="T10">2Ki 8:24-29</text:span></text:p>
              <text:p text:style-name="P27"><text:span text:style-name="T10">2Ki 9:16,21,23,27,28</text:span></text:p>
              <text:p text:style-name="P27"><text:span text:style-name="T10">2Ki 11:1,2</text:span></text:p>
              <text:p text:style-name="P27"><text:span text:style-name="T10">2Ch 21:17</text:span></text:p>
              <text:p text:style-name="P27"><text:span text:style-name="T10">2Ch 22:1,6,7,10</text:span></text:p>
              <text:p text:style-name="P28"><text:span text:style-name="T10">Dies in Megiddo to injuries from Jehu (2Ki 9:27)</text:span></text:p>
              <text:p text:style-name="P28"><text:span text:style-name="T10"/></text:p>
              <text:p text:style-name="P28"><text:span text:style-name="T10">All of younger Ahaziah’s elder brothers (sons of Jehoram) were slain before he was made king (2Ch 22:1). Elder Ahaziah was his step brother (2Ki 8:27) and survived until Jehu found him hiding in Samaria after the battle with the Syrians (2Ch 22:9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9" xml:id="id9" draw:id="id9" draw:layer="layout" svg:width="4.346cm" svg:height="3.345cm" svg:x="16.249cm" svg:y="17.708cm">
              <text:p text:style-name="P27"><text:span text:style-name="T10">Brother in law to Jehoram (2Ch 21:4,13, 2Ch 22:9)</text:span></text:p>
              <text:p text:style-name="P27"><text:span text:style-name="T10">Uncle in law to younger Ahaziah</text:span></text:p>
              <text:p text:style-name="P27"><text:span text:style-name="T10"/></text:p>
              <text:p text:style-name="P27"><text:span text:style-name="T10">2Ki 9:29</text:span></text:p>
              <text:p text:style-name="P27"><text:span text:style-name="T10">2Ch 22:2-5,9</text:span></text:p>
              <text:p text:style-name="P28"><text:span text:style-name="T10">Dies in Samaria/Jezreel by Jehu (2Ki 10)</text:span></text:p>
              <text:p text:style-name="P28"><text:span text:style-name="T10"/></text:p>
              <text:p text:style-name="P28"><text:span text:style-name="T10">If 2Ki 9-10 &amp; 2Ch 22 are in chronological order then the younger Ahaziah died before the elder Ahaziah (meaning also that the elder Ahaziah survived for ~1yr after his reign ended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9" xml:id="id3" draw:id="id3" draw:layer="layout" svg:width="4.957cm" svg:height="2.639cm" svg:x="15.49cm" svg:y="5.716cm">
              <text:p text:style-name="P27"><text:span text:style-name="T10">There must be two Athaliahs for several reasons:</text:span></text:p>
              <text:p text:style-name="P27"><text:span text:style-name="T10"/></text:p>
              <text:p text:style-name="P27"><text:span text:style-name="T10">2Ch 22:2 “also”</text:span></text:p>
              <text:p text:style-name="P28"><text:span text:style-name="T14">2Ki 11:1, 2Ch 22:10 </text:span><text:span text:style-name="T10"><text:s/>“son” (singular)</text:span></text:p>
              <text:p text:style-name="P28"><text:span text:style-name="T10"/></text:p>
              <text:p text:style-name="P28"><text:span text:style-name="T10">Additionally, see the notes below on Jehoram slaying all his brethren of Jehoshaphat and all of younger Ahaziahs elder brothers being slain before he was made king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0" xml:id="id1" draw:id="id1" draw:layer="layout" svg:width="4.858cm" svg:height="1.441cm" svg:x="13.599cm" svg:y="15.781cm">
              <draw:glue-point draw:id="4" svg:x="-3.266cm" svg:y="5.002cm"/>
              <text:p text:style-name="P28"><text:span text:style-name="T10">Jehoram slew all his brethren of Jehoshaphat after he began to reign (2Ch 21:4,13) which means that elder Ahaziah could not have been his brethren of Jehoshaphat but at the same time he is his brother (2Ch 22:9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5" draw:text-style-name="P31" draw:layer="layout" draw:type="curve" svg:x1="16.028cm" svg:y1="17.222cm" svg:x2="14.415cm" svg:y2="19.252cm" draw:start-shape="id1" draw:start-glue-point="2" draw:end-shape="id2" draw:end-glue-point="1" svg:d="M16028 17222c0 1354-537 2030-1613 2030" svg:viewBox="0 0 1614 2031">
              <text:p/>
            </draw:connector>
            <draw:line draw:style-name="gr14" draw:text-style-name="P7" draw:layer="layout" svg:x1="7.641cm" svg:y1="19.757cm" svg:x2="12.202cm" svg:y2="19.757cm">
              <text:p text:style-name="P6"><text:span text:style-name="T1">11th year <text:s text:c="11"/>Age: 42 </text:span></text:p>
              <text:p text:style-name="P6"><text:span text:style-name="T1">2Ki 9:29 <text:s text:c="12"/>2Ch 22:2 <text:s text:c="49"/>6th year</text:span></text:p>
              <text:p text:style-name="P6"><text:span text:style-name="T1"/></text:p>
              <text:p text:style-name="P6"><text:span text:style-name="T1"/></text:p>
            </draw:line>
            <draw:line draw:style-name="gr3" draw:text-style-name="P4" draw:layer="layout" svg:x1="12.613cm" svg:y1="10.098cm" svg:x2="16.478cm" svg:y2="10.098cm">
              <text:p text:style-name="P3"><text:span text:style-name="T1">33rd year <text:s text:c="23"/>Jehoram is born</text:span></text:p>
              <text:p text:style-name="P3"><text:span text:style-name="T1">Jehoshaphat age: 26</text:span></text:p>
            </draw:line>
            <draw:line draw:style-name="gr26" draw:text-style-name="P32" draw:layer="layout" svg:x1="6.066cm" svg:y1="27.147cm" svg:x2="6.066cm" svg:y2="27.632cm">
              <text:p text:style-name="P8"><text:span text:style-name="T15">2</text:span></text:p>
            </draw:line>
            <draw:connector draw:style-name="gr27" draw:text-style-name="P31" draw:layer="layout" draw:type="curve" svg:x1="17.968cm" svg:y1="8.355cm" svg:x2="18.158cm" svg:y2="9.082cm" draw:start-shape="id3" draw:start-glue-point="2" draw:end-shape="id4" draw:end-glue-point="0" svg:d="M17968 8355c0 544 190 181 190 727" svg:viewBox="0 0 191 728">
              <text:p/>
            </draw:connector>
            <draw:line draw:style-name="gr26" draw:text-style-name="P32" draw:layer="layout" svg:x1="11.004cm" svg:y1="12.128cm" svg:x2="11.004cm" svg:y2="12.377cm">
              <text:p text:style-name="P8"><text:span text:style-name="T15">1</text:span></text:p>
            </draw:line>
            <draw:line draw:style-name="gr28" draw:text-style-name="P31" xml:id="id6" draw:id="id6" draw:layer="layout" svg:x1="4.979cm" svg:y1="20.012cm" svg:x2="5.614cm" svg:y2="20.012cm">
              <text:p/>
            </draw:line>
            <draw:line draw:style-name="gr26" draw:text-style-name="P32" draw:layer="layout" svg:x1="4.073cm" svg:y1="8.833cm" svg:x2="4.073cm" svg:y2="9.594cm">
              <text:p text:style-name="P8"><text:span text:style-name="T15">3</text:span></text:p>
            </draw:line>
            <draw:line draw:style-name="gr26" draw:text-style-name="P32" draw:layer="layout" svg:x1="10.407cm" svg:y1="18.734cm" svg:x2="10.407cm" svg:y2="19.757cm">
              <text:p text:style-name="P8"><text:span text:style-name="T15">4</text:span></text:p>
            </draw:line>
            <draw:line draw:style-name="gr29" draw:text-style-name="P4" draw:layer="layout" svg:x1="6.039cm" svg:y1="2.23cm" svg:x2="9.272cm" svg:y2="2.23cm">
              <text:p text:style-name="P3"><text:span text:style-name="T1">2nd year 1Ki 15:25</text:span></text:p>
              <text:p text:style-name="P3"><text:span text:style-name="T1"/></text:p>
            </draw:line>
            <draw:line draw:style-name="gr3" draw:text-style-name="P4" draw:layer="layout" svg:x1="12.037cm" svg:y1="12.128cm" svg:x2="15.187cm" svg:y2="12.128cm">
              <text:p text:style-name="P3"><text:span text:style-name="T1">41st year, dies 2Ch 16:13</text:span></text:p>
              <text:p text:style-name="P3"><text:span text:style-name="T1"/></text:p>
            </draw:line>
            <draw:custom-shape draw:style-name="gr30" draw:text-style-name="P17" draw:layer="layout" svg:width="3.302cm" svg:height="5.588cm" svg:x="4.412cm" svg:y="11.362cm">
              <text:p text:style-name="P16"><text:span text:style-name="T8">Ahab</text:span></text:p>
              <text:p text:style-name="P16"><text:span text:style-name="T8">22yrs</text:span></text:p>
              <text:p text:style-name="P16"><text:span text:style-name="T16">In Samaria</text:span></text:p>
              <text:p text:style-name="P16"><text:span text:style-name="T8">1Ki 16:2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1" draw:text-style-name="P17" draw:layer="layout" svg:width="3.302cm" svg:height="10.16cm" svg:x="9.315cm" svg:y="21.79cm">
              <text:p text:style-name="P16"><text:span text:style-name="T8">Joash/Jehoash</text:span></text:p>
              <text:p text:style-name="P16"><text:span text:style-name="T8">40yrs</text:span></text:p>
              <text:p text:style-name="P16"><text:span text:style-name="T8">2Ki 12:1</text:span></text:p>
              <text:p text:style-name="P16"><text:span text:style-name="T8">2Ch 24: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2" draw:text-style-name="P17" draw:layer="layout" svg:width="3.302cm" svg:height="7.112cm" svg:x="4.414cm" svg:y="20.012cm">
              <text:p text:style-name="P16"><text:span text:style-name="T8">Jehu</text:span></text:p>
              <text:p text:style-name="P16"><text:span text:style-name="T8">28yrs</text:span></text:p>
              <text:p text:style-name="P16"><text:span text:style-name="T8">2Ki 10:3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3" draw:text-style-name="P34" draw:layer="layout" svg:width="3.419cm" svg:height="0.508cm" svg:x="2.744cm" svg:y="16.709cm">
              <text:p text:style-name="P33"><text:span text:style-name="T2">Ahaziah 2yrs 1Ki 22:5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4" draw:text-style-name="P17" draw:layer="layout" svg:width="3.302cm" svg:height="10.414cm" svg:x="9.311cm" svg:y="1.714cm">
              <text:p text:style-name="P16"><text:span text:style-name="T8">Asa</text:span></text:p>
              <text:p text:style-name="P16"><text:span text:style-name="T8">41yrs</text:span></text:p>
              <text:p text:style-name="P16"><text:span text:style-name="T8">1Ki 15:10</text:span></text:p>
              <text:p text:style-name="P16"><text:span text:style-name="T8">Mat 1:7,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5" draw:text-style-name="P17" draw:layer="layout" svg:width="3.302cm" svg:height="6.096cm" svg:x="4.411cm" svg:y="2.472cm">
              <text:p text:style-name="P16"><text:span text:style-name="T8">Baasha</text:span></text:p>
              <text:p text:style-name="P16"><text:span text:style-name="T8">son of Ahijah</text:span></text:p>
              <text:p text:style-name="P16"><text:span text:style-name="T8">24yrs</text:span></text:p>
              <text:p text:style-name="P16"><text:span text:style-name="T8">in Tirzah</text:span></text:p>
              <text:p text:style-name="P16"><text:span text:style-name="T8">1Ki 15:3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6" draw:text-style-name="P35" draw:layer="layout" svg:width="3.912cm" svg:height="0.508cm" svg:x="2.411cm" svg:y="2.23cm">
              <text:p text:style-name="P25"><text:span text:style-name="T17">Nadab 2yrs 1Ki 15:2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7" draw:text-style-name="P17" draw:layer="layout" svg:width="3.302cm" svg:height="6.35cm" svg:x="9.312cm" svg:y="12.384cm">
              <text:p text:style-name="P16"><text:span text:style-name="T8">Jehoshaphat/Josaphat</text:span></text:p>
              <text:p text:style-name="P16"><text:span text:style-name="T8">25yrs in Jerusalem</text:span></text:p>
              <text:p text:style-name="P16"><text:span text:style-name="T8">2Ch 20:31</text:span></text:p>
              <text:p text:style-name="P16"><text:span text:style-name="T8">Mat 1: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8" draw:text-style-name="P37" xml:id="id2" draw:id="id2" draw:layer="layout" svg:width="3.302cm" svg:height="2.032cm" svg:x="11.113cm" svg:y="18.236cm">
              <draw:glue-point draw:id="4" svg:x="5cm" svg:y="-2.495cm"/>
              <text:p text:style-name="P36"><text:span text:style-name="T18">Jehoram/Joram</text:span></text:p>
              <text:p text:style-name="P36"><text:span text:style-name="T18">8yrs</text:span></text:p>
              <text:p text:style-name="P36"><text:span text:style-name="T18">2Ki 8:16,17,21 2Ch 21:5, Mat 1: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9" draw:text-style-name="P39" draw:layer="layout" svg:width="3.15cm" svg:height="0.254cm" svg:x="9.302cm" svg:y="19.757cm">
              <text:p text:style-name="P38"><text:span text:style-name="T4">Ahaziah 1yr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0" draw:text-style-name="P39" xml:id="id8" draw:id="id8" draw:layer="layout" svg:width="3.454cm" svg:height="0.254cm" svg:x="9.302cm" svg:y="20.011cm">
              <text:p text:style-name="P38"><text:span text:style-name="T19">Ahaziah/Jehoahaz/Azariah 1yr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onnector draw:style-name="gr41" draw:text-style-name="P31" draw:layer="layout" draw:type="curve" svg:x1="2.926cm" svg:y1="20.542cm" svg:x2="4.979cm" svg:y2="20.012cm" draw:start-shape="id5" draw:start-glue-point="0" draw:end-shape="id6" draw:end-glue-point="3" svg:d="M2926 20542c0-354 684-530 2053-530" svg:viewBox="0 0 2054 531">
              <text:p/>
            </draw:connector>
            <draw:line draw:style-name="gr42" draw:text-style-name="P7" draw:layer="layout" svg:x1="7.19cm" svg:y1="20.011cm" svg:x2="9.593cm" svg:y2="20.011cm">
              <text:p text:style-name="P6"><text:span text:style-name="T1"/></text:p>
              <text:p text:style-name="P6"><text:span text:style-name="T1"/></text:p>
              <text:p text:style-name="P6"><text:span text:style-name="T1"><text:s text:c="3"/>12th year <text:s/>Age: 22 <text:s text:c="10"/></text:span></text:p>
              <text:p text:style-name="P6"><text:span text:style-name="T1"><text:s text:c="15"/>2Ki 8:25,26 <text:s text:c="10"/></text:span></text:p>
            </draw:line>
            <draw:line draw:style-name="gr14" draw:text-style-name="P7" draw:layer="layout" svg:x1="7.716cm" svg:y1="18.236cm" svg:x2="12.789cm" svg:y2="18.236cm">
              <text:p text:style-name="P6"><text:span text:style-name="T1"><text:s text:c="5"/>5th year</text:span></text:p>
              <text:p text:style-name="P6"><text:span text:style-name="T1"><text:s text:c="5"/>2Ki 8:16</text:span></text:p>
            </draw:line>
            <draw:line draw:style-name="gr43" draw:text-style-name="P9" draw:layer="layout" svg:x1="7.716cm" svg:y1="18.734cm" svg:x2="11.113cm" svg:y2="18.734cm">
              <text:p text:style-name="P8"><text:span text:style-name="T1"/></text:p>
              <text:p text:style-name="P8"><text:span text:style-name="T1"><text:s text:c="9"/>7th year <text:s text:c="20"/>2nd year 2Ki 1:17 <text:s text:c="6"/></text:span></text:p>
            </draw:line>
            <draw:connector draw:style-name="gr44" draw:text-style-name="P5" draw:layer="layout" draw:type="curve" svg:x1="14.579cm" svg:y1="21.342cm" svg:x2="12.756cm" svg:y2="20.138cm" draw:start-shape="id7" draw:start-glue-point="4" draw:end-shape="id8" draw:end-glue-point="1" svg:d="M14579 21342c0-803-607-1204-1823-1204" svg:viewBox="0 0 1824 1205">
              <text:p/>
            </draw:connector>
            <draw:connector draw:style-name="gr44" draw:text-style-name="P5" draw:layer="layout" draw:type="curve" svg:x1="16.249cm" svg:y1="19.38cm" svg:x2="12.465cm" svg:y2="19.884cm" draw:start-shape="id9" draw:start-glue-point="3" svg:d="M16249 19380c-3213 0-1321 504-3784 504" svg:viewBox="0 0 3785 505">
              <text:p/>
            </draw:connector>
            <draw:custom-shape draw:style-name="gr45" draw:text-style-name="P40" draw:layer="layout" svg:width="3.302cm" svg:height="3.048cm" svg:x="2.843cm" svg:y="9.594cm">
              <text:p text:style-name="P14"><text:span text:style-name="T6">Omri</text:span></text:p>
              <text:p text:style-name="P14"><text:span text:style-name="T6">12yrs</text:span></text:p>
              <text:p text:style-name="P14"><text:span text:style-name="T7">6yrs in Tirzah</text:span></text:p>
              <text:p text:style-name="P14"><text:span text:style-name="T7">Built the city Samaria</text:span></text:p>
              <text:p text:style-name="P14"><text:span text:style-name="T6">1Ki 16:2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6" draw:text-style-name="P35" draw:layer="layout" svg:width="2.743cm" svg:height="0.254cm" svg:x="1.369cm" svg:y="9.594cm">
              <text:p text:style-name="P25"><text:span text:style-name="T13">Tibni ??yrs 1Ki 16:21,2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29" draw:text-style-name="P4" draw:layer="layout" svg:x1="7.23cm" svg:y1="2.472cm" svg:x2="9.284cm" svg:y2="2.472cm"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>3rd year</text:span></text:p>
              <text:p text:style-name="P3"><text:span text:style-name="T1">1Ki 15:28,33</text:span></text:p>
              <text:p text:style-name="P3"><text:span text:style-name="T1"><text:s text:c="82"/>Baasha kills</text:span></text:p>
              <text:p text:style-name="P3"><text:span text:style-name="T1">Nadab</text:span></text:p>
            </draw:line>
            <draw:connector draw:style-name="gr47" draw:text-style-name="P31" draw:layer="layout" draw:type="curve" draw:line-skew="-1.172cm" svg:x1="3.967cm" svg:y1="7.363cm" svg:x2="7.715cm" svg:y2="10.573cm" draw:start-shape="id10" draw:start-glue-point="1" draw:end-shape="id11" draw:end-glue-point="4" svg:d="M3967 7363c1051 0-822 3210 3748 3210" svg:viewBox="0 0 3749 3211">
              <text:p/>
            </draw:connector>
            <draw:line draw:style-name="gr48" draw:text-style-name="P41" draw:layer="layout" svg:x1="10.774cm" svg:y1="18.224cm" svg:x2="10.774cm" svg:y2="19.745cm">
              <text:p text:style-name="P8"><text:span text:style-name="T15"><text:s text:c="8"/>6</text:span></text:p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1131 754" svg:d="M566 0l-566 754 114-85 136-68 148-46 161-17 161 13 153 46 140 68 118 89z"/>
    <draw:marker draw:name="Concave_20_short" draw:display-name="Concave short" svg:viewBox="0 0 1131 754" svg:d="M566 0l-566 754 114-85 136-68 148-46 161-17 161 13 153 46 140 68 118 89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62cm" fo:margin-bottom="0.762cm" fo:margin-left="0.762cm" fo:margin-right="0.762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2T15:53:05.591896100</meta:creation-date>
    <dc:date>2026-07-11T12:21:03.408446918</dc:date>
    <meta:editing-duration>PT3H10M2S</meta:editing-duration>
    <meta:editing-cycles>34</meta:editing-cycles>
    <meta:generator>LibreOffice/26.2.4.2$Linux_X86_64 LibreOffice_project/64a984c51f4702dbd3710b13428c673a2f1292e7</meta:generator>
    <meta:document-statistic meta:object-count="69"/>
  </office:meta>
</office:document-meta>
</file>