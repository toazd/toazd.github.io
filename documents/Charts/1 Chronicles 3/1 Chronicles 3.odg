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BlackChancery" svg:font-family="BlackChancery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dp2" style:family="drawing-page">
      <style:drawing-page-properties draw:fill="solid" draw:fill-color="#ffffff"/>
    </style:style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draw:stroke="dash" draw:stroke-dash="Dot" svg:stroke-width="0.106cm" svg:stroke-color="#ff0000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objectwithoutfill">
      <style:graphic-properties svg:stroke-width="0.106cm" svg:stroke-color="#ff8000" draw:marker-start-width="0.359cm" draw:marker-end="Arrowheads_20_1" draw:marker-end-width="0.459cm" draw:fill="none" draw:textarea-vertical-align="middle" fo:padding-top="0.053cm" fo:padding-bottom="0.053cm" fo:padding-left="0.053cm" fo:padding-right="0.053cm" loext:decorative="false"/>
    </style:style>
    <style:style style:name="gr5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draw:stroke="dash" draw:stroke-dash="Dot"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dash" draw:stroke-dash="Long_20_Dot" svg:stroke-color="#ff8000" svg:stroke-linecap="butt" draw:fill="none" loext:fill-use-slide-background="false" draw:textarea-horizontal-align="justify" draw:textarea-vertical-align="bottom" draw:auto-grow-height="false" fo:min-height="4.253cm" fo:min-width="10.433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8000" draw:fill="none" loext:fill-use-slide-background="false" draw:textarea-horizontal-align="right" draw:textarea-vertical-align="middle" draw:auto-grow-height="false" fo:min-height="2.926cm" fo:min-width="49.607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ff8000" draw:marker-start-width="0.359cm" draw:marker-end-width="0.359cm" draw:textarea-horizontal-align="justify" draw:textarea-vertical-align="middle" draw:auto-grow-height="false" fo:min-height="1.936cm" fo:min-width="2.194cm" fo:padding-top="0.178cm" fo:padding-bottom="0.178cm" fo:padding-left="0.303cm" fo:padding-right="0.303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42cm" fo:min-width="2.75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ffa6a6" draw:textarea-horizontal-align="justify" draw:textarea-vertical-align="middle" draw:auto-grow-height="false" fo:min-height="2.242cm" fo:min-width="2.7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42cm" fo:min-width="2.801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2.778cm" fo:min-width="23.313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ec9ba4" draw:textarea-horizontal-align="justify" draw:textarea-vertical-align="middle" draw:auto-grow-height="false" fo:min-height="2.242cm" fo:min-width="2.7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06cm" svg:stroke-color="#ff8000" draw:marker-start-width="0.359cm" draw:marker-end-width="0.359cm" draw:textarea-horizontal-align="justify" draw:textarea-vertical-align="middle" draw:auto-grow-height="false" fo:min-height="2.548cm" fo:min-width="2.146cm" fo:padding-top="0.178cm" fo:padding-bottom="0.178cm" fo:padding-left="0.303cm" fo:padding-right="0.303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106cm" svg:stroke-color="#ff8000" draw:marker-start-width="0.359cm" draw:marker-end-width="0.359cm" draw:textarea-horizontal-align="justify" draw:textarea-vertical-align="middle" draw:auto-grow-height="false" fo:min-height="2.028cm" fo:min-width="2.844cm" fo:padding-top="0.178cm" fo:padding-bottom="0.178cm" fo:padding-left="0.303cm" fo:padding-right="0.303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106cm" svg:stroke-color="#ff8000" draw:marker-start-width="0.359cm" draw:marker-end-width="0.359cm" draw:textarea-horizontal-align="justify" draw:textarea-vertical-align="middle" draw:auto-grow-height="false" fo:min-height="3.158cm" fo:min-width="2.146cm" fo:padding-top="0.178cm" fo:padding-bottom="0.178cm" fo:padding-left="0.303cm" fo:padding-right="0.303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106cm" svg:stroke-color="#ff8000" draw:marker-start-width="0.359cm" draw:marker-end-width="0.359cm" draw:textarea-horizontal-align="justify" draw:textarea-vertical-align="middle" draw:auto-grow-height="false" fo:min-height="2.498cm" fo:min-width="2.146cm" fo:padding-top="0.178cm" fo:padding-bottom="0.178cm" fo:padding-left="0.303cm" fo:padding-right="0.303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106cm" svg:stroke-color="#ff8000" draw:marker-start-width="0.359cm" draw:marker-end-width="0.359cm" draw:textarea-horizontal-align="justify" draw:textarea-vertical-align="middle" draw:auto-grow-height="false" fo:min-height="4.012cm" fo:min-width="2.238cm" fo:padding-top="0.178cm" fo:padding-bottom="0.178cm" fo:padding-left="0.303cm" fo:padding-right="0.303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261cm" fo:min-width="2.702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b2b2b2" draw:textarea-horizontal-align="justify" draw:textarea-vertical-align="middle" draw:auto-grow-height="false" fo:min-height="2.242cm" fo:min-width="2.75cm" style:writing-mode="lr-tb" loext:decorative="false"/>
      <style:paragraph-properties style:writing-mode="lr-tb"/>
    </style:style>
    <style:style style:name="gr22" style:family="graphic" style:parent-style-name="standard">
      <style:graphic-properties draw:fill="solid" draw:fill-color="#b2b2b2" draw:textarea-horizontal-align="justify" draw:textarea-vertical-align="middle" draw:auto-grow-height="false" fo:min-height="2.242cm" fo:min-width="2.902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ff8000" draw:fill="none" loext:fill-use-slide-background="false" draw:textarea-horizontal-align="left" draw:textarea-vertical-align="middle" draw:auto-grow-height="false" fo:min-height="2.556cm" fo:min-width="19.067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ff8000" draw:fill="none" loext:fill-use-slide-background="false" draw:textarea-horizontal-align="right" draw:textarea-vertical-align="middle" draw:auto-grow-height="false" fo:min-height="2.641cm" fo:min-width="10.138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ff8000" draw:fill="none" loext:fill-use-slide-background="false" draw:textarea-horizontal-align="justify" draw:textarea-vertical-align="top" draw:auto-grow-height="false" fo:min-height="10.188cm" fo:min-width="2.991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ff8000" draw:fill="none" loext:fill-use-slide-background="false" draw:textarea-horizontal-align="justify" draw:textarea-vertical-align="top" draw:auto-grow-height="false" fo:min-height="11.151cm" fo:min-width="2.991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ff8000" draw:fill="none" loext:fill-use-slide-background="false" draw:textarea-horizontal-align="left" draw:textarea-vertical-align="middle" draw:auto-grow-height="false" fo:min-height="4.515cm" fo:min-width="11.526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ff8000" draw:fill="none" loext:fill-use-slide-background="false" draw:textarea-horizontal-align="left" draw:textarea-vertical-align="middle" draw:auto-grow-height="false" fo:min-height="9.387cm" fo:min-width="9.396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106cm" svg:stroke-color="#ff8000" draw:marker-start-width="0.359cm" draw:marker-end-width="0.359cm" draw:fill="solid" draw:fill-color="#ffa6a6" draw:textarea-horizontal-align="justify" draw:textarea-vertical-align="middle" draw:auto-grow-height="false" fo:min-height="2.278cm" fo:min-width="2.684cm" fo:padding-top="0.053cm" fo:padding-bottom="0.053cm" fo:padding-left="0.053cm" fo:padding-right="0.053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2.451cm" fo:min-width="13.466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8000" draw:fill="none" loext:fill-use-slide-background="false" draw:textarea-horizontal-align="left" draw:textarea-vertical-align="middle" draw:auto-grow-height="false" fo:min-height="2.53cm" fo:min-width="11.102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ff8000" draw:fill="none" loext:fill-use-slide-background="false" draw:textarea-horizontal-align="left" draw:textarea-vertical-align="bottom" draw:auto-grow-height="false" fo:min-height="6.404cm" fo:min-width="2.926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ff8000" draw:fill="none" loext:fill-use-slide-background="false" draw:textarea-horizontal-align="left" draw:textarea-vertical-align="bottom" draw:auto-grow-height="false" fo:min-height="9.64cm" fo:min-width="2.926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ff8000" draw:fill="none" loext:fill-use-slide-background="false" draw:textarea-horizontal-align="right" draw:textarea-vertical-align="middle" draw:auto-grow-height="false" fo:min-height="2.483cm" fo:min-width="10.296cm" style:writing-mode="lr-tb" loext:decorative="false"/>
      <style:paragraph-properties style:writing-mode="lr-tb"/>
    </style:style>
    <style:style style:name="gr35" style:family="graphic" style:parent-style-name="standard">
      <style:graphic-properties loext:decorative="false"/>
    </style:style>
    <style:style style:name="gr36" style:family="graphic" style:parent-style-name="standard">
      <style:graphic-properties draw:stroke="none" draw:fill="none" fo:min-height="8.456cm" loext:decorative="false"/>
      <style:paragraph-properties style:writing-mode="lr-tb"/>
    </style:style>
    <style:style style:name="gr37" style:family="graphic" style:parent-style-name="standard">
      <style:graphic-properties svg:stroke-width="0.106cm" svg:stroke-color="#ff8000" draw:marker-start-width="0.359cm" draw:marker-end-width="0.359cm" draw:textarea-horizontal-align="justify" draw:textarea-vertical-align="middle" draw:auto-grow-height="false" fo:min-height="2.447cm" fo:min-width="2.146cm" fo:padding-top="0.178cm" fo:padding-bottom="0.178cm" fo:padding-left="0.303cm" fo:padding-right="0.303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8000" draw:fill="none" loext:fill-use-slide-background="false" draw:textarea-horizontal-align="justify" draw:textarea-vertical-align="bottom" draw:auto-grow-height="false" fo:min-height="4.296cm" fo:min-width="2.991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svg:stroke-color="#ff8000" draw:fill="none" loext:fill-use-slide-background="false" draw:textarea-horizontal-align="left" draw:textarea-vertical-align="middle" draw:auto-grow-height="false" fo:min-height="2.556cm" fo:min-width="19.067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ff8000" draw:fill="none" loext:fill-use-slide-background="false" draw:textarea-horizontal-align="center" draw:textarea-vertical-align="bottom" draw:auto-grow-height="false" fo:min-height="6.404cm" fo:min-width="2.926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ff8000" draw:fill="none" loext:fill-use-slide-background="false" draw:textarea-horizontal-align="center" draw:textarea-vertical-align="bottom" draw:auto-grow-height="false" fo:min-height="9.64cm" fo:min-width="2.926cm" style:writing-mode="lr-tb" loext:decorative="false"/>
      <style:paragraph-properties style:writing-mode="lr-tb"/>
    </style:style>
    <style:style style:name="co1" style:family="table-column">
      <style:table-column-properties style:column-width="3.146cm" style:use-optimal-column-width="false"/>
    </style:style>
    <style:style style:name="co2" style:family="table-column">
      <style:table-column-properties style:column-width="0.615cm" style:use-optimal-column-width="false"/>
    </style:style>
    <style:style style:name="co3" style:family="table-column">
      <style:table-column-properties style:column-width="0.588cm" style:use-optimal-column-width="false"/>
    </style:style>
    <style:style style:name="co4" style:family="table-column">
      <style:table-column-properties style:column-width="2.363cm" style:use-optimal-column-width="false"/>
    </style:style>
    <style:style style:name="ro1" style:family="table-row">
      <style:table-row-properties style:row-height="0.777cm" style:use-optimal-row-height="false"/>
    </style:style>
    <style:style style:name="ce1" style:family="table-cell">
      <style:paragraph-properties fo:text-align="center" fo:border-left="0.43pt solid #ff8000" fo:border-right="0.28pt solid #000000" fo:border-top="0.43pt solid #ff8000" fo:border-bottom="0.28pt solid #000000" style:text-autospace="none"/>
      <style:text-properties fo:color="#ff8000" loext:opacity="100%" style:font-name="Gabriela Nerd Font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ce2" style:family="table-cell">
      <style:paragraph-properties fo:text-align="center" fo:border-left="0.28pt solid #000000" fo:border-right="0.28pt solid #000000" fo:border-top="0.43pt solid #ff8000" fo:border-bottom="0.28pt solid #000000" style:text-autospace="none"/>
      <style:text-properties fo:color="#ff8000" loext:opacity="100%" style:font-name="Gabriela Nerd Font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ce3" style:family="table-cell">
      <style:paragraph-properties fo:text-align="center" fo:border-left="0.28pt solid #000000" fo:border-right="0.43pt solid #ff8000" fo:border-top="0.43pt solid #ff8000" fo:border-bottom="0.28pt solid #000000" style:text-autospace="none"/>
      <style:text-properties fo:color="#ff8000" loext:opacity="100%" style:font-name="Gabriela Nerd Font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ce4" style:family="table-cell">
      <style:paragraph-properties fo:text-align="center" fo:border-left="0.43pt solid #ff8000" fo:border-right="0.28pt solid #000000" fo:border-top="0.28pt solid #000000" fo:border-bottom="0.28pt solid #000000" style:text-autospace="none"/>
      <style:text-properties fo:color="#ff8000" loext:opacity="100%" style:font-name="Gabriela Nerd Font" fo:font-size="12pt" style:font-name-asian="Liberation Sans1" style:font-size-asian="12pt" style:font-name-complex="Liberation Sans1" style:font-size-complex="12pt"/>
    </style:style>
    <style:style style:name="ce5" style:family="table-cell">
      <style:paragraph-properties fo:text-align="center" style:text-autospace="none"/>
      <style:text-properties fo:color="#ff8000" loext:opacity="100%" style:font-name="Gabriela Nerd Font" fo:font-size="12pt" style:font-name-asian="Liberation Sans1" style:font-size-asian="12pt" style:font-name-complex="Liberation Sans1" style:font-size-complex="12pt"/>
    </style:style>
    <style:style style:name="ce6" style:family="table-cell">
      <style:paragraph-properties fo:text-align="center" style:text-autospace="none"/>
      <style:text-properties fo:color="#2a6099" loext:opacity="100%" style:font-name="Gabriela Nerd Font" fo:font-size="12pt" style:font-name-asian="Liberation Sans1" style:font-size-asian="12pt" style:font-name-complex="Liberation Sans1" style:font-size-complex="12pt"/>
    </style:style>
    <style:style style:name="ce7" style:family="table-cell">
      <style:paragraph-properties fo:text-align="center" fo:border-left="0.28pt solid #000000" fo:border-right="0.43pt solid #ff8000" fo:border-top="0.28pt solid #000000" fo:border-bottom="0.28pt solid #000000" style:text-autospace="none"/>
      <style:text-properties fo:color="#ff8000" loext:opacity="100%" style:font-name="Gabriela Nerd Font" fo:font-size="12pt" style:font-name-asian="Liberation Sans1" style:font-size-asian="12pt" style:font-name-complex="Liberation Sans1" style:font-size-complex="12pt"/>
    </style:style>
    <style:style style:name="ce8" style:family="table-cell">
      <style:paragraph-properties fo:text-align="center" fo:border-left="0.28pt solid #000000" fo:border-right="0.43pt solid #ff8000" fo:border-top="0.28pt solid #000000" fo:border-bottom="0.28pt solid #000000" style:text-autospace="none"/>
      <style:text-properties fo:color="#2a6099" loext:opacity="100%" style:font-name="Gabriela Nerd Font" fo:font-size="12pt" style:font-name-asian="Liberation Sans1" style:font-size-asian="12pt" style:font-name-complex="Liberation Sans1" style:font-size-complex="12pt"/>
    </style:style>
    <style:style style:name="ce9" style:family="table-cell">
      <style:paragraph-properties fo:text-align="center" fo:border-left="0.43pt solid #ff8000" fo:border-right="0.28pt solid #000000" fo:border-top="0.28pt solid #000000" fo:border-bottom="0.43pt solid #ff8000" style:text-autospace="none"/>
      <style:text-properties fo:color="#ff8000" loext:opacity="100%" style:font-name="Gabriela Nerd Font" fo:font-size="12pt" style:font-name-asian="Liberation Sans1" style:font-size-asian="12pt" style:font-name-complex="Liberation Sans1" style:font-size-complex="12pt"/>
    </style:style>
    <style:style style:name="ce10" style:family="table-cell">
      <style:paragraph-properties fo:text-align="center" fo:border-left="0.28pt solid #000000" fo:border-right="0.28pt solid #000000" fo:border-top="0.28pt solid #000000" fo:border-bottom="0.43pt solid #ff8000" style:text-autospace="none"/>
      <style:text-properties fo:color="#ff8000" loext:opacity="100%" style:font-name="Gabriela Nerd Font" fo:font-size="12pt" style:font-name-asian="Liberation Sans1" style:font-size-asian="12pt" style:font-name-complex="Liberation Sans1" style:font-size-complex="12pt"/>
    </style:style>
    <style:style style:name="ce11" style:family="table-cell">
      <style:paragraph-properties fo:text-align="center" fo:border-left="0.28pt solid #000000" fo:border-right="0.28pt solid #000000" fo:border-top="0.28pt solid #000000" fo:border-bottom="0.43pt solid #ff8000" style:text-autospace="none"/>
      <style:text-properties fo:color="#2a6099" loext:opacity="100%" style:font-name="Gabriela Nerd Font" fo:font-size="12pt" style:font-name-asian="Liberation Sans1" style:font-size-asian="12pt" style:font-name-complex="Liberation Sans1" style:font-size-complex="12pt"/>
    </style:style>
    <style:style style:name="ce12" style:family="table-cell">
      <style:paragraph-properties fo:text-align="center" fo:border-left="0.28pt solid #000000" fo:border-right="0.43pt solid #ff8000" fo:border-top="0.28pt solid #000000" fo:border-bottom="0.43pt solid #ff8000" style:text-autospace="none"/>
      <style:text-properties fo:color="#ff8000" loext:opacity="100%" style:font-name="Gabriela Nerd Font" fo:font-size="12pt" style:font-name-asian="Liberation Sans1" style:font-size-asian="12pt" style:font-name-complex="Liberation Sans1" style:font-size-complex="12pt"/>
    </style:style>
    <style:style style:name="ce13" style:family="table-cell">
      <style:paragraph-properties fo:text-align="center" fo:border-left="0.43pt solid #000000" fo:border-right="none" fo:border-top="0.43pt solid #000000" fo:border-bottom="none" style:text-autospace="none"/>
      <style:text-properties fo:color="#000000" loext:opacity="100%" style:font-name="Gabriela Nerd Font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ce14" style:family="table-cell">
      <style:paragraph-properties fo:text-align="center" fo:border-left="none" fo:border-right="none" fo:border-top="0.43pt solid #000000" fo:border-bottom="none" style:text-autospace="none"/>
      <style:text-properties fo:color="#ff8000" loext:opacity="100%" style:font-name="Gabriela Nerd Font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ce15" style:family="table-cell">
      <style:paragraph-properties fo:text-align="center" fo:border-left="none" fo:border-right="none" fo:border-top="0.43pt solid #000000" fo:border-bottom="none" style:text-autospace="none"/>
      <style:text-properties fo:color="#000000" loext:opacity="100%" style:font-name="Gabriela Nerd Font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ce16" style:family="table-cell">
      <style:paragraph-properties fo:text-align="center" fo:border-left="none" fo:border-right="0.43pt solid #000000" fo:border-top="0.43pt solid #000000" fo:border-bottom="none" style:text-autospace="none"/>
      <style:text-properties fo:color="#000000" loext:opacity="100%" style:font-name="Gabriela Nerd Font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ce17" style:family="table-cell">
      <style:paragraph-properties fo:text-align="center" fo:border-left="0.43pt solid #000000" fo:border-right="none" fo:border-top="none" fo:border-bottom="none" style:text-autospace="none"/>
      <style:text-properties fo:color="#000000" loext:opacity="100%" style:font-name="Gabriela Nerd Font" fo:font-size="12pt" style:font-name-asian="Liberation Sans1" style:font-size-asian="12pt" style:font-name-complex="Liberation Sans1" style:font-size-complex="12pt"/>
    </style:style>
    <style:style style:name="ce18" style:family="table-cell">
      <style:paragraph-properties fo:text-align="center" fo:border="none" style:text-autospace="none"/>
      <style:text-properties fo:color="#ff8000" loext:opacity="100%" style:font-name="Gabriela Nerd Font" fo:font-size="12pt" style:font-name-asian="Liberation Sans1" style:font-size-asian="12pt" style:font-name-complex="Liberation Sans1" style:font-size-complex="12pt"/>
    </style:style>
    <style:style style:name="ce19" style:family="table-cell">
      <style:paragraph-properties fo:text-align="center" fo:border="none" style:text-autospace="none"/>
      <style:text-properties fo:color="#2a6099" loext:opacity="100%" style:font-name="Gabriela Nerd Font" fo:font-size="12pt" style:font-name-asian="Liberation Sans1" style:font-size-asian="12pt" style:font-name-complex="Liberation Sans1" style:font-size-complex="12pt"/>
    </style:style>
    <style:style style:name="ce20" style:family="table-cell">
      <style:paragraph-properties fo:text-align="center" fo:border-left="none" fo:border-right="0.43pt solid #000000" fo:border-top="none" fo:border-bottom="none" style:text-autospace="none"/>
      <style:text-properties fo:color="#000000" loext:opacity="100%" style:font-name="Gabriela Nerd Font" fo:font-size="12pt" style:font-name-asian="Liberation Sans1" style:font-size-asian="12pt" style:font-name-complex="Liberation Sans1" style:font-size-complex="12pt"/>
    </style:style>
    <style:style style:name="ce21" style:family="table-cell">
      <style:paragraph-properties fo:text-align="center" fo:border="none" style:text-autospace="none"/>
      <style:text-properties fo:color="#000000" loext:opacity="100%" style:font-name="Gabriela Nerd Font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22" style:family="table-cell">
      <style:paragraph-properties fo:text-align="center" fo:border="none" style:text-autospace="none"/>
      <style:text-properties fo:color="#000000" loext:opacity="100%" style:font-name="Gabriela Nerd Font" fo:font-size="12pt" style:font-name-asian="Liberation Sans1" style:font-size-asian="12pt" style:font-name-complex="Liberation Sans1" style:font-size-complex="12pt"/>
    </style:style>
    <style:style style:name="ce23" style:family="table-cell">
      <style:paragraph-properties fo:text-align="center" fo:border-left="none" fo:border-right="0.43pt solid #000000" fo:border-top="none" fo:border-bottom="none" style:text-autospace="none"/>
      <style:text-properties fo:color="#2a6099" loext:opacity="100%" style:font-name="Gabriela Nerd Font" fo:font-size="12pt" style:font-name-asian="Liberation Sans1" style:font-size-asian="12pt" style:font-name-complex="Liberation Sans1" style:font-size-complex="12pt"/>
    </style:style>
    <style:style style:name="ce24" style:family="table-cell">
      <style:paragraph-properties fo:text-align="center" fo:border-left="0.43pt solid #000000" fo:border-right="none" fo:border-top="none" fo:border-bottom="0.43pt solid #000000" style:text-autospace="none"/>
      <style:text-properties fo:color="#000000" loext:opacity="100%" style:font-name="Gabriela Nerd Font" fo:font-size="12pt" style:font-name-asian="Liberation Sans1" style:font-size-asian="12pt" style:font-name-complex="Liberation Sans1" style:font-size-complex="12pt"/>
    </style:style>
    <style:style style:name="ce25" style:family="table-cell">
      <style:paragraph-properties fo:text-align="center" fo:border-left="none" fo:border-right="none" fo:border-top="none" fo:border-bottom="0.43pt solid #000000" style:text-autospace="none"/>
      <style:text-properties fo:color="#ff8000" loext:opacity="100%" style:font-name="Gabriela Nerd Font" fo:font-size="12pt" style:font-name-asian="Liberation Sans1" style:font-size-asian="12pt" style:font-name-complex="Liberation Sans1" style:font-size-complex="12pt"/>
    </style:style>
    <style:style style:name="ce26" style:family="table-cell">
      <style:paragraph-properties fo:text-align="center" fo:border-left="none" fo:border-right="none" fo:border-top="none" fo:border-bottom="0.43pt solid #000000" style:text-autospace="none"/>
      <style:text-properties fo:color="#2a6099" loext:opacity="100%" style:font-name="Gabriela Nerd Font" fo:font-size="12pt" style:font-name-asian="Liberation Sans1" style:font-size-asian="12pt" style:font-name-complex="Liberation Sans1" style:font-size-complex="12pt"/>
    </style:style>
    <style:style style:name="ce27" style:family="table-cell">
      <style:paragraph-properties fo:text-align="center" fo:border-left="none" fo:border-right="0.43pt solid #000000" fo:border-top="none" fo:border-bottom="0.43pt solid #000000" style:text-autospace="none"/>
      <style:text-properties fo:color="#000000" loext:opacity="100%" style:font-name="Gabriela Nerd Font" fo:font-size="12pt" style:font-name-asian="Liberation Sans1" style:font-size-asian="12pt" style:font-name-complex="Liberation Sans1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8000" loext:opacity="100%" style:font-name="Gabriela Nerd Font" fo:font-size="10pt" style:font-size-asian="10pt" style:font-size-complex="10pt"/>
    </style:style>
    <style:style style:name="P3" style:family="paragraph">
      <loext:graphic-properties draw:fill="none"/>
      <style:paragraph-properties fo:text-align="center" style:writing-mode="lr-tb"/>
      <style:text-properties fo:color="#ff8000" loext:opacity="100%" style:font-name="Gabriela Nerd Font" fo:font-size="10pt" style:font-size-asian="10pt" style:font-size-complex="10pt"/>
    </style:style>
    <style:style style:name="P4" style:family="paragraph">
      <style:paragraph-properties fo:text-align="right"/>
      <style:text-properties fo:color="#ff8000" loext:opacity="100%" style:font-name="Gabriela Nerd Font" fo:font-size="10pt" style:font-size-asian="10pt" style:font-size-complex="10pt"/>
    </style:style>
    <style:style style:name="P5" style:family="paragraph">
      <loext:graphic-properties draw:fill="none"/>
      <style:paragraph-properties fo:text-align="right" style:writing-mode="lr-tb"/>
      <style:text-properties fo:color="#ff8000" loext:opacity="100%" style:font-name="Gabriela Nerd Font" fo:font-size="10pt" style:font-size-asian="10pt" style:font-size-complex="10pt"/>
    </style:style>
    <style:style style:name="P6" style:family="paragraph">
      <style:paragraph-properties fo:text-align="center"/>
      <style:text-properties style:font-name="Gabriela Nerd Font" fo:font-size="12pt" style:font-size-asian="12pt" style:font-size-complex="12pt"/>
    </style:style>
    <style:style style:name="P7" style:family="paragraph">
      <style:paragraph-properties fo:text-align="center" style:writing-mode="lr-tb"/>
      <style:text-properties style:font-name="Gabriela Nerd Font" fo:font-size="12pt" style:font-size-asian="12pt" style:font-size-complex="12pt"/>
    </style:style>
    <style:style style:name="P8" style:family="paragraph">
      <loext:graphic-properties draw:fill="solid" draw:fill-color="#ffa6a6"/>
      <style:paragraph-properties fo:text-align="center" style:writing-mode="lr-tb"/>
      <style:text-properties style:font-name="Gabriela Nerd Font" fo:font-size="12pt" style:font-size-asian="12pt" style:font-size-complex="12pt"/>
    </style:style>
    <style:style style:name="P9" style:family="paragraph">
      <style:paragraph-properties fo:text-align="center"/>
      <style:text-properties style:font-name="Gabriela Nerd Font" fo:font-size="12pt" style:text-underline-style="none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Gabriela Nerd Font" fo:font-size="12pt" style:text-underline-style="none" style:font-size-asian="12pt" style:font-size-complex="12pt"/>
    </style:style>
    <style:style style:name="P11" style:family="paragraph">
      <style:paragraph-properties fo:text-align="center" style:writing-mode="lr-tb"/>
      <style:text-properties style:font-name="Gabriela Nerd Font" fo:font-size="12pt" style:text-underline-style="none" style:font-size-asian="12pt" style:font-size-complex="12pt"/>
    </style:style>
    <style:style style:name="P12" style:family="paragraph">
      <style:paragraph-properties fo:text-align="left"/>
      <style:text-properties fo:color="#ff8000" loext:opacity="100%" style:font-name="Gabriela Nerd Font" fo:font-size="10pt" style:font-size-asian="10pt" style:font-size-complex="10pt"/>
    </style:style>
    <style:style style:name="P13" style:family="paragraph">
      <loext:graphic-properties draw:fill="none"/>
      <style:paragraph-properties fo:text-align="left" style:writing-mode="lr-tb"/>
      <style:text-properties fo:color="#ff8000" loext:opacity="100%" style:font-name="Gabriela Nerd Font"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Gabriela Nerd Font" fo:font-size="12pt" style:font-size-asian="12pt" style:font-size-complex="12pt"/>
    </style:style>
    <style:style style:name="P15" style:family="paragraph">
      <loext:graphic-properties draw:fill="solid" draw:fill-color="#ec9ba4"/>
      <style:paragraph-properties fo:text-align="center" style:writing-mode="lr-tb"/>
      <style:text-properties style:font-name="Gabriela Nerd Font" fo:font-size="12pt" style:text-underline-style="none" style:font-size-asian="12pt" style:font-size-complex="12pt"/>
    </style:style>
    <style:style style:name="P16" style:family="paragraph">
      <loext:graphic-properties draw:fill="solid" draw:fill-color="#ffa6a6"/>
      <style:paragraph-properties fo:text-align="center" style:writing-mode="lr-tb"/>
      <style:text-properties style:font-name="Gabriela Nerd Font" fo:font-size="12pt" style:text-underline-style="none" style:font-size-asian="12pt" style:font-size-complex="12pt"/>
    </style:style>
    <style:style style:name="P17" style:family="paragraph">
      <loext:graphic-properties draw:fill="solid" draw:fill-color="#b2b2b2"/>
      <style:paragraph-properties fo:text-align="center" style:writing-mode="lr-tb"/>
      <style:text-properties style:font-name="Gabriela Nerd Font" fo:font-size="12pt" style:text-underline-style="none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left" fo:text-indent="0cm"/>
      <style:text-properties fo:color="#ff8000" loext:opacity="100%" style:font-name="Gabriela Nerd Font" fo:font-size="1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left" fo:text-indent="0cm" style:writing-mode="lr-tb"/>
      <style:text-properties fo:color="#ff8000" loext:opacity="100%" style:font-name="Gabriela Nerd Font" fo:font-size="10pt"/>
    </style:style>
    <style:style style:name="P20" style:family="paragraph">
      <style:paragraph-properties fo:text-align="right"/>
      <style:text-properties fo:color="#ff8000" loext:opacity="100%" style:font-name="Gabriela Nerd Font" fo:font-size="10pt"/>
    </style:style>
    <style:style style:name="P21" style:family="paragraph">
      <loext:graphic-properties draw:fill="none"/>
      <style:paragraph-properties fo:text-align="right" style:writing-mode="lr-tb"/>
      <style:text-properties fo:color="#ff8000" loext:opacity="100%" style:font-name="Gabriela Nerd Font" fo:font-size="10pt"/>
    </style:style>
    <style:style style:name="P22" style:family="paragraph">
      <style:paragraph-properties fo:text-align="center"/>
      <style:text-properties fo:color="#ff8000" loext:opacity="100%" style:font-name="Gabriela Nerd Font" fo:font-size="10pt"/>
    </style:style>
    <style:style style:name="P23" style:family="paragraph">
      <loext:graphic-properties draw:fill="none"/>
      <style:paragraph-properties fo:text-align="center" style:writing-mode="lr-tb"/>
      <style:text-properties fo:color="#ff8000" loext:opacity="100%" style:font-name="Gabriela Nerd Font" fo:font-size="10pt"/>
    </style:style>
    <style:style style:name="P24" style:family="paragraph">
      <style:paragraph-properties fo:text-align="left"/>
      <style:text-properties fo:color="#ff8000" loext:opacity="100%" style:font-name="Gabriela Nerd Font" fo:font-size="10pt"/>
    </style:style>
    <style:style style:name="P25" style:family="paragraph">
      <loext:graphic-properties draw:fill="none"/>
      <style:paragraph-properties fo:text-align="left" style:writing-mode="lr-tb"/>
      <style:text-properties fo:color="#ff8000" loext:opacity="100%" style:font-name="Gabriela Nerd Font" fo:font-size="10pt"/>
    </style:style>
    <style:style style:name="P26" style:family="paragraph">
      <style:paragraph-properties fo:text-align="center" style:text-autospace="none"/>
      <style:text-properties fo:color="#ff8000" loext:opacity="100%" style:font-name="Gabriela Nerd Font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27" style:family="paragraph">
      <style:paragraph-properties fo:text-align="center" style:text-autospace="none"/>
      <style:text-properties fo:color="#ff8000" loext:opacity="100%" style:font-name="Gabriela Nerd Font" fo:font-size="12pt" style:font-name-asian="Liberation Sans1" style:font-size-asian="12pt" style:font-name-complex="Liberation Sans1" style:font-size-complex="12pt"/>
    </style:style>
    <style:style style:name="P28" style:family="paragraph">
      <style:paragraph-properties fo:text-align="center" style:text-autospace="none"/>
      <style:text-properties fo:color="#2a6099" loext:opacity="100%" style:font-name="Gabriela Nerd Font" fo:font-size="12pt" style:font-name-asian="Liberation Sans1" style:font-size-asian="12pt" style:font-name-complex="Liberation Sans1" style:font-size-complex="12pt"/>
    </style:style>
    <style:style style:name="P29" style:family="paragraph">
      <loext:graphic-properties draw:fill="none"/>
    </style:style>
    <style:style style:name="P30" style:family="paragraph">
      <style:paragraph-properties fo:text-align="center"/>
      <style:text-properties fo:color="#000000" loext:opacity="100%" style:font-name="Gabriela Nerd Font" fo:font-size="10pt" style:font-size-asian="10pt" style:font-size-complex="10pt"/>
    </style:style>
    <style:style style:name="P31" style:family="paragraph">
      <loext:graphic-properties draw:fill="none"/>
      <style:paragraph-properties fo:text-align="center" style:writing-mode="lr-tb"/>
      <style:text-properties fo:color="#000000" loext:opacity="100%" style:font-name="Gabriela Nerd Font" fo:font-size="10pt" style:font-size-asian="10pt" style:font-size-complex="10pt"/>
    </style:style>
    <style:style style:name="P32" style:family="paragraph">
      <style:paragraph-properties fo:text-align="right"/>
      <style:text-properties fo:color="#000000" loext:opacity="100%" style:font-name="Gabriela Nerd Font" fo:font-size="10pt" fo:font-weight="bold" style:font-size-asian="10pt" style:font-weight-asian="bold" style:font-size-complex="10pt" style:font-weight-complex="bold"/>
    </style:style>
    <style:style style:name="P33" style:family="paragraph">
      <loext:graphic-properties draw:fill="none"/>
      <style:paragraph-properties fo:text-align="right" style:writing-mode="lr-tb"/>
      <style:text-properties fo:color="#000000" loext:opacity="100%" style:font-name="Gabriela Nerd Font" fo:font-size="10pt" fo:font-weight="bold" style:font-size-asian="10pt" style:font-weight-asian="bold" style:font-size-complex="10pt" style:font-weight-complex="bold"/>
    </style:style>
    <style:style style:name="P34" style:family="paragraph">
      <style:paragraph-properties fo:text-align="left"/>
      <style:text-properties fo:color="#000000" loext:opacity="100%" style:font-name="Gabriela Nerd Font" fo:font-size="10pt" style:font-size-asian="10pt" style:font-size-complex="10pt"/>
    </style:style>
    <style:style style:name="P35" style:family="paragraph">
      <loext:graphic-properties draw:fill="none"/>
      <style:paragraph-properties fo:text-align="left" style:writing-mode="lr-tb"/>
      <style:text-properties fo:color="#000000" loext:opacity="100%" style:font-name="Gabriela Nerd Font" fo:font-size="10pt" style:font-size-asian="10pt" style:font-size-complex="10pt"/>
    </style:style>
    <style:style style:name="P36" style:family="paragraph">
      <style:paragraph-properties fo:margin-left="0cm" fo:margin-right="0cm" fo:margin-top="0cm" fo:margin-bottom="0cm" fo:line-height="100%" fo:text-align="left" fo:text-indent="0cm"/>
      <style:text-properties fo:color="#000000" loext:opacity="100%" style:font-name="Gabriela Nerd Font" fo:font-size="10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left" fo:text-indent="0cm" style:writing-mode="lr-tb"/>
      <style:text-properties fo:color="#000000" loext:opacity="100%" style:font-name="Gabriela Nerd Font" fo:font-size="10pt"/>
    </style:style>
    <style:style style:name="P38" style:family="paragraph">
      <style:paragraph-properties fo:text-align="right"/>
      <style:text-properties fo:color="#000000" loext:opacity="100%" style:font-name="Gabriela Nerd Font" fo:font-size="10pt"/>
    </style:style>
    <style:style style:name="P39" style:family="paragraph">
      <loext:graphic-properties draw:fill="none"/>
      <style:paragraph-properties fo:text-align="right" style:writing-mode="lr-tb"/>
      <style:text-properties fo:color="#000000" loext:opacity="100%" style:font-name="Gabriela Nerd Font" fo:font-size="10pt"/>
    </style:style>
    <style:style style:name="P40" style:family="paragraph">
      <style:paragraph-properties fo:text-align="center"/>
      <style:text-properties fo:color="#000000" loext:opacity="100%" style:font-name="Gabriela Nerd Font" fo:font-size="10pt"/>
    </style:style>
    <style:style style:name="P41" style:family="paragraph">
      <loext:graphic-properties draw:fill="none"/>
      <style:paragraph-properties fo:text-align="center" style:writing-mode="lr-tb"/>
      <style:text-properties fo:color="#000000" loext:opacity="100%" style:font-name="Gabriela Nerd Font" fo:font-size="10pt"/>
    </style:style>
    <style:style style:name="P42" style:family="paragraph">
      <style:paragraph-properties fo:text-align="left"/>
      <style:text-properties fo:color="#000000" loext:opacity="100%" style:font-name="Gabriela Nerd Font" fo:font-size="10pt"/>
    </style:style>
    <style:style style:name="P43" style:family="paragraph">
      <loext:graphic-properties draw:fill="none"/>
      <style:paragraph-properties fo:text-align="left" style:writing-mode="lr-tb"/>
      <style:text-properties fo:color="#000000" loext:opacity="100%" style:font-name="Gabriela Nerd Font" fo:font-size="10pt"/>
    </style:style>
    <style:style style:name="P44" style:family="paragraph">
      <style:paragraph-properties fo:text-align="center" style:text-autospace="none"/>
      <style:text-properties fo:color="#000000" loext:opacity="100%" style:font-name="Gabriela Nerd Font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45" style:family="paragraph">
      <style:paragraph-properties fo:text-align="center" style:text-autospace="none"/>
      <style:text-properties fo:color="#000000" loext:opacity="100%" style:font-name="Gabriela Nerd Font" fo:font-size="12pt" style:font-name-asian="Liberation Sans1" style:font-size-asian="12pt" style:font-name-complex="Liberation Sans1" style:font-size-complex="12pt"/>
    </style:style>
    <style:style style:name="P46" style:family="paragraph">
      <style:paragraph-properties fo:text-align="center" style:text-autospace="none"/>
      <style:text-properties fo:color="#000000" loext:opacity="100%" style:font-name="Gabriela Nerd Font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P47" style:family="paragraph">
      <loext:graphic-properties draw:fill="none"/>
      <style:text-properties fo:color="#000000" loext:opacity="100%"/>
    </style:style>
    <style:style style:name="T1" style:family="text">
      <style:text-properties fo:color="#ff8000" loext:opacity="100%" style:font-name="Gabriela Nerd Font" fo:font-size="10pt" style:font-size-asian="10pt" style:font-size-complex="10pt"/>
    </style:style>
    <style:style style:name="T2" style:family="text">
      <style:text-properties fo:color="#ff8000" loext:opacity="100%" style:font-name="Gabriela Nerd Font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Gabriela Nerd Font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Gabriela Nerd Font" fo:font-size="10pt" style:font-size-asian="10pt" style:font-size-complex="10pt"/>
    </style:style>
    <style:style style:name="T5" style:family="text">
      <style:text-properties style:font-name="Gabriela Nerd Fon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style:font-name="Gabriela Nerd Font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Gabriela Nerd Font"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style:font-name="Gabriela Nerd Font" fo:font-size="10pt" style:text-underline-style="none" style:font-size-asian="10pt" style:font-size-complex="10pt"/>
    </style:style>
    <style:style style:name="T9" style:family="text">
      <style:text-properties style:font-name="Gabriela Nerd Font" fo:font-size="10pt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color="#ff0000" loext:opacity="100%" style:font-name="Gabriela Nerd Font" fo:font-size="10pt" style:text-underline-style="none" style:font-size-asian="10pt" style:font-size-complex="10pt"/>
    </style:style>
    <style:style style:name="T11" style:family="text">
      <style:text-properties fo:color="#ff8000" loext:opacity="100%" style:font-name="Gabriela Nerd Font" fo:font-size="10pt" fo:font-weight="bold" style:font-weight-asian="bold" style:font-weight-complex="bold"/>
    </style:style>
    <style:style style:name="T12" style:family="text">
      <style:text-properties fo:color="#ff8000" loext:opacity="100%" style:font-name="Gabriela Nerd Font" fo:font-size="10pt"/>
    </style:style>
    <style:style style:name="T13" style:family="text">
      <style:text-properties style:font-name="Gabriela Nerd Font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ff8000" loext:opacity="100%" style:font-name="Gabriela Nerd Font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T15" style:family="text">
      <style:text-properties fo:color="#ff8000" loext:opacity="100%" style:font-name="Gabriela Nerd Font" fo:font-size="12pt" style:font-name-asian="Liberation Sans1" style:font-size-asian="12pt" style:font-name-complex="Liberation Sans1" style:font-size-complex="12pt"/>
    </style:style>
    <style:style style:name="T16" style:family="text">
      <style:text-properties fo:color="#2a6099" loext:opacity="100%" style:font-name="Gabriela Nerd Font" fo:font-size="12pt" style:font-name-asian="Liberation Sans1" style:font-size-asian="12pt" style:font-name-complex="Liberation Sans1" style:font-size-complex="12pt"/>
    </style:style>
    <style:style style:name="T17" style:family="text">
      <style:text-properties fo:color="#ff8000" loext:opacity="100%" style:font-name="Gabriela Nerd Font" fo:font-size="80pt" style:font-size-asian="80pt" style:font-size-complex="80pt"/>
    </style:style>
    <style:style style:name="T18" style:family="text">
      <style:text-properties fo:color="#ff8000" loext:opacity="100%" style:font-name="BlackChancery" fo:font-size="96pt" style:font-size-asian="96pt" style:font-size-complex="96pt"/>
    </style:style>
    <style:style style:name="T19" style:family="text">
      <style:text-properties style:font-name="Gabriela Nerd Font" fo:font-size="10pt" style:text-underline-style="none" fo:font-weight="normal" style:font-size-asian="10pt" style:font-weight-asian="normal" style:font-size-complex="10pt" style:font-weight-complex="normal"/>
    </style:style>
    <style:style style:name="T20" style:family="text">
      <style:text-properties fo:color="#000000" loext:opacity="100%" style:font-name="Gabriela Nerd Font" fo:font-size="10pt" style:font-size-asian="10pt" style:font-size-complex="10pt"/>
    </style:style>
    <style:style style:name="T21" style:family="text">
      <style:text-properties fo:color="#000000" loext:opacity="100%" style:font-name="Gabriela Nerd Font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000000" loext:opacity="100%" style:font-name="Gabriela Nerd Font" fo:font-size="10pt" fo:font-weight="bold" style:font-weight-asian="bold" style:font-weight-complex="bold"/>
    </style:style>
    <style:style style:name="T23" style:family="text">
      <style:text-properties fo:color="#000000" loext:opacity="100%" style:font-name="Gabriela Nerd Font" fo:font-size="10pt"/>
    </style:style>
    <style:style style:name="T24" style:family="text">
      <style:text-properties fo:color="#000000" loext:opacity="100%" style:font-name="Gabriela Nerd Font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T25" style:family="text">
      <style:text-properties fo:color="#000000" loext:opacity="100%" style:font-name="Gabriela Nerd Font" fo:font-size="12pt" style:font-name-asian="Liberation Sans1" style:font-size-asian="12pt" style:font-name-complex="Liberation Sans1" style:font-size-complex="12pt"/>
    </style:style>
    <style:style style:name="T26" style:family="text">
      <style:text-properties fo:color="#000000" loext:opacity="100%" style:font-name="Gabriela Nerd Font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T27" style:family="text">
      <style:text-properties fo:color="#000000" loext:opacity="100%" style:font-name="Gabriela Nerd Font" fo:font-size="80pt" style:font-size-asian="80pt" style:font-size-complex="80pt"/>
    </style:style>
    <style:style style:name="T28" style:family="text">
      <style:text-properties fo:color="#000000" loext:opacity="100%" style:font-name="BlackChancery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onnector draw:style-name="gr2" draw:text-style-name="P1" draw:layer="layout" draw:type="curve" svg:x1="39.608cm" svg:y1="74.501cm" svg:x2="35.924cm" svg:y2="73.301cm" draw:start-shape="id1" draw:start-glue-point="0" draw:end-shape="id2" svg:d="M39608 74501c0-859-3684-260-3684-1200" svg:viewBox="0 0 3685 1201">
            <text:p/>
          </draw:connector>
          <draw:connector draw:style-name="gr3" draw:text-style-name="P1" draw:layer="layout" draw:type="curve" svg:x1="40.415cm" svg:y1="35.827cm" svg:x2="40.418cm" svg:y2="34.995cm" draw:start-shape="id3" draw:start-glue-point="0" draw:end-shape="id4" draw:end-glue-point="2" svg:d="M40415 35827c0-622 3-207 3-832" svg:viewBox="0 0 4 833">
            <text:p/>
          </draw:connector>
          <draw:connector draw:style-name="gr3" draw:text-style-name="P1" draw:layer="layout" draw:type="curve" svg:x1="40.418cm" svg:y1="34.995cm" svg:x2="44.219cm" svg:y2="36.119cm" draw:start-shape="id4" draw:start-glue-point="2" draw:end-shape="id5" draw:end-glue-point="0" svg:d="M40418 34995c0 843 3801 281 3801 1124" svg:viewBox="0 0 3802 1125">
            <text:p/>
          </draw:connector>
          <draw:connector draw:style-name="gr3" draw:text-style-name="P1" draw:layer="layout" draw:type="curve" svg:x1="79.923cm" svg:y1="15.118cm" svg:x2="40.35cm" svg:y2="5.211cm" draw:start-shape="id6" draw:start-glue-point="0" draw:end-shape="id7" draw:end-glue-point="2" svg:d="M79923 15118c0-7390-39573-2437-39573-9907" svg:viewBox="0 0 39574 9908">
            <text:p/>
          </draw:connector>
          <draw:connector draw:style-name="gr3" draw:text-style-name="P1" draw:layer="layout" draw:type="curve" svg:x1="44.618cm" svg:y1="15.113cm" svg:x2="40.35cm" svg:y2="5.211cm" draw:start-shape="id8" draw:start-glue-point="0" draw:end-shape="id7" draw:end-glue-point="2" svg:d="M44618 15113c0-7386-4268-2435-4268-9902" svg:viewBox="0 0 4269 9903">
            <text:p/>
          </draw:connector>
          <draw:connector draw:style-name="gr3" draw:text-style-name="P1" draw:layer="layout" draw:type="curve" svg:x1="48.219cm" svg:y1="15.114cm" svg:x2="40.35cm" svg:y2="5.211cm" draw:start-shape="id9" draw:start-glue-point="0" draw:end-shape="id7" draw:end-glue-point="2" svg:d="M48219 15114c0-7387-7869-2436-7869-9903" svg:viewBox="0 0 7870 9904">
            <text:p/>
          </draw:connector>
          <draw:connector draw:style-name="gr3" draw:text-style-name="P1" draw:layer="layout" draw:type="curve" svg:x1="51.819cm" svg:y1="15.114cm" svg:x2="40.35cm" svg:y2="5.211cm" draw:start-shape="id10" draw:start-glue-point="0" draw:end-shape="id7" draw:end-glue-point="2" svg:d="M51819 15114c0-7387-11469-2436-11469-9903" svg:viewBox="0 0 11470 9904">
            <text:p/>
          </draw:connector>
          <draw:connector draw:style-name="gr3" draw:text-style-name="P1" draw:layer="layout" draw:type="curve" svg:x1="55.52cm" svg:y1="15.115cm" svg:x2="40.35cm" svg:y2="5.211cm" draw:start-shape="id11" draw:start-glue-point="0" draw:end-shape="id7" draw:end-glue-point="2" svg:d="M55520 15115c0-7387-15170-2436-15170-9904" svg:viewBox="0 0 15171 9905">
            <text:p/>
          </draw:connector>
          <draw:connector draw:style-name="gr3" draw:text-style-name="P1" draw:layer="layout" draw:type="curve" svg:x1="59.219cm" svg:y1="15.114cm" svg:x2="40.35cm" svg:y2="5.211cm" draw:start-shape="id12" draw:start-glue-point="0" draw:end-shape="id7" draw:end-glue-point="2" svg:d="M59219 15114c0-7387-18869-2436-18869-9903" svg:viewBox="0 0 18870 9904">
            <text:p/>
          </draw:connector>
          <draw:connector draw:style-name="gr3" draw:text-style-name="P1" draw:layer="layout" draw:type="curve" svg:x1="62.92cm" svg:y1="15.115cm" svg:x2="40.35cm" svg:y2="5.211cm" draw:start-shape="id13" draw:start-glue-point="0" draw:end-shape="id7" draw:end-glue-point="2" svg:d="M62920 15115c0-7387-22570-2436-22570-9904" svg:viewBox="0 0 22571 9905">
            <text:p/>
          </draw:connector>
          <draw:connector draw:style-name="gr3" draw:text-style-name="P1" draw:layer="layout" draw:type="curve" svg:x1="66.62cm" svg:y1="15.115cm" svg:x2="40.35cm" svg:y2="5.211cm" draw:start-shape="id14" draw:start-glue-point="0" draw:end-shape="id7" draw:end-glue-point="2" svg:d="M66620 15115c0-7387-26270-2436-26270-9904" svg:viewBox="0 0 26271 9905">
            <text:p/>
          </draw:connector>
          <draw:connector draw:style-name="gr3" draw:text-style-name="P1" draw:layer="layout" draw:type="curve" svg:x1="70.321cm" svg:y1="15.116cm" svg:x2="40.35cm" svg:y2="5.211cm" draw:start-shape="id15" draw:start-glue-point="0" draw:end-shape="id7" draw:end-glue-point="2" svg:d="M70321 15116c0-7389-29971-2437-29971-9905" svg:viewBox="0 0 29972 9906">
            <text:p/>
          </draw:connector>
          <draw:connector draw:style-name="gr3" draw:text-style-name="P1" draw:layer="layout" draw:type="curve" svg:x1="74.022cm" svg:y1="15.117cm" svg:x2="40.35cm" svg:y2="5.211cm" draw:start-shape="id16" draw:start-glue-point="0" draw:end-shape="id7" draw:end-glue-point="2" svg:d="M74022 15117c0-7389-33672-2436-33672-9906" svg:viewBox="0 0 33673 9907">
            <text:p/>
          </draw:connector>
          <draw:connector draw:style-name="gr3" draw:text-style-name="P1" draw:layer="layout" draw:type="curve" svg:x1="83.721cm" svg:y1="15.116cm" svg:x2="40.35cm" svg:y2="5.211cm" draw:start-shape="id17" draw:start-glue-point="0" draw:end-shape="id7" draw:end-glue-point="2" svg:d="M83721 15116c0-7389-43371-2437-43371-9905" svg:viewBox="0 0 43372 9906">
            <text:p/>
          </draw:connector>
          <draw:connector draw:style-name="gr4" draw:text-style-name="P1" draw:layer="layout" draw:type="curve" svg:x1="55.522cm" svg:y1="19.615cm" svg:x2="55.528cm" svg:y2="21.607cm" draw:start-shape="id18" draw:start-glue-point="2" draw:end-shape="id19" draw:end-glue-point="0" svg:d="M55522 19615c0 1474 6 479 6 1992" svg:viewBox="0 0 7 1993">
            <text:p/>
          </draw:connector>
          <draw:connector draw:style-name="gr2" draw:text-style-name="P1" draw:layer="layout" draw:type="curve" svg:x1="14.298cm" svg:y1="10.61cm" svg:x2="14.32cm" svg:y2="5.211cm" draw:start-shape="id20" draw:start-glue-point="0" draw:end-shape="id21" draw:end-glue-point="2" svg:d="M14298 10610c0-4048 22-1349 22-5399" svg:viewBox="0 0 23 5400">
            <text:p/>
          </draw:connector>
          <draw:connector draw:style-name="gr3" draw:text-style-name="P1" draw:layer="layout" draw:type="curve" svg:x1="7.182cm" svg:y1="13.149cm" svg:x2="7.182cm" svg:y2="15.154cm" draw:start-shape="id22" draw:start-glue-point="2" draw:end-shape="id23" draw:end-glue-point="0" svg:d="M7182 13149v2005" svg:viewBox="0 0 1 2006">
            <text:p/>
          </draw:connector>
          <draw:connector draw:style-name="gr3" draw:text-style-name="P1" draw:layer="layout" draw:type="curve" svg:x1="10.694cm" svg:y1="15.171cm" svg:x2="10.697cm" svg:y2="13.149cm" draw:start-shape="id24" draw:start-glue-point="0" draw:end-shape="id25" draw:end-glue-point="2" svg:d="M10694 15171c0-1515 3-504 3-2022" svg:viewBox="0 0 4 2023">
            <text:p/>
          </draw:connector>
          <draw:connector draw:style-name="gr3" draw:text-style-name="P1" draw:layer="layout" draw:type="curve" svg:x1="14.3cm" svg:y1="15.172cm" svg:x2="14.298cm" svg:y2="13.15cm" draw:start-shape="id26" draw:start-glue-point="0" draw:end-shape="id20" svg:d="M14300 15172c0-1515-2-504-2-2022" svg:viewBox="0 0 3 2023">
            <text:p/>
          </draw:connector>
          <draw:connector draw:style-name="gr3" draw:text-style-name="P1" draw:layer="layout" draw:type="curve" svg:x1="17.901cm" svg:y1="15.171cm" svg:x2="17.899cm" svg:y2="13.151cm" draw:start-shape="id27" draw:start-glue-point="0" draw:end-shape="id28" draw:end-glue-point="2" svg:d="M17901 15171c0-1513-2-504-2-2020" svg:viewBox="0 0 3 2021">
            <text:p/>
          </draw:connector>
          <draw:connector draw:style-name="gr3" draw:text-style-name="P1" draw:layer="layout" draw:type="curve" svg:x1="21.503cm" svg:y1="15.146cm" svg:x2="21.5cm" svg:y2="13.152cm" draw:start-shape="id29" draw:start-glue-point="0" draw:end-shape="id30" draw:end-glue-point="2" svg:d="M21503 15146c0-1494-3-497-3-1994" svg:viewBox="0 0 4 1995">
            <text:p/>
          </draw:connector>
          <draw:connector draw:style-name="gr3" draw:text-style-name="P1" draw:layer="layout" draw:type="curve" svg:x1="25.177cm" svg:y1="15.121cm" svg:x2="25.174cm" svg:y2="13.127cm" draw:start-shape="id31" draw:start-glue-point="0" draw:end-shape="id32" draw:end-glue-point="2" svg:d="M25177 15121c0-1494-3-497-3-1994" svg:viewBox="0 0 4 1995">
            <text:p/>
          </draw:connector>
          <draw:connector draw:style-name="gr3" draw:text-style-name="P1" draw:layer="layout" draw:type="curve" svg:x1="29.912cm" svg:y1="15.117cm" svg:x2="29.893cm" svg:y2="13.102cm" draw:start-shape="id33" draw:start-glue-point="0" draw:end-shape="id34" draw:end-glue-point="2" svg:d="M29912 15117c0-1510-19-503-19-2015" svg:viewBox="0 0 20 2016">
            <text:p/>
          </draw:connector>
          <draw:connector draw:style-name="gr3" draw:text-style-name="P1" draw:layer="layout" draw:type="curve" svg:x1="33.413cm" svg:y1="15.118cm" svg:x2="29.893cm" svg:y2="13.102cm" draw:start-shape="id35" draw:start-glue-point="0" draw:end-shape="id34" draw:end-glue-point="2" svg:d="M33413 15118c0-1510-3520-503-3520-2016" svg:viewBox="0 0 3521 2017">
            <text:p/>
          </draw:connector>
          <draw:connector draw:style-name="gr3" draw:text-style-name="P1" draw:layer="layout" draw:type="curve" svg:x1="36.913cm" svg:y1="15.118cm" svg:x2="29.893cm" svg:y2="13.102cm" draw:start-shape="id36" draw:start-glue-point="0" draw:end-shape="id34" draw:end-glue-point="2" svg:d="M36913 15118c0-1510-7020-503-7020-2016" svg:viewBox="0 0 7021 2017">
            <text:p/>
          </draw:connector>
          <draw:connector draw:style-name="gr3" draw:text-style-name="P1" draw:layer="layout" draw:type="curve" svg:x1="40.414cm" svg:y1="15.119cm" svg:x2="29.893cm" svg:y2="13.102cm" draw:start-shape="id37" draw:start-glue-point="0" draw:end-shape="id34" draw:end-glue-point="2" svg:d="M40414 15119c0-1551-10521-543-10521-2017" svg:viewBox="0 0 10522 2018">
            <text:p/>
          </draw:connector>
          <draw:connector draw:style-name="gr5" draw:text-style-name="P1" draw:layer="layout" draw:type="curve" svg:x1="40.35cm" svg:y1="5.211cm" svg:x2="7.182cm" svg:y2="10.609cm" draw:start-shape="id7" draw:start-glue-point="2" draw:end-shape="id22" draw:end-glue-point="0" svg:d="M40350 5211c0 4089-33168 1390-33168 5398" svg:viewBox="0 0 33169 5399">
            <text:p/>
          </draw:connector>
          <draw:connector draw:style-name="gr5" draw:text-style-name="P1" draw:layer="layout" draw:type="curve" svg:x1="40.35cm" svg:y1="5.211cm" svg:x2="10.697cm" svg:y2="10.609cm" draw:start-shape="id7" draw:start-glue-point="2" draw:end-shape="id25" draw:end-glue-point="0" svg:d="M40350 5211c0 4089-29653 1390-29653 5398" svg:viewBox="0 0 29654 5399">
            <text:p/>
          </draw:connector>
          <draw:connector draw:style-name="gr5" draw:text-style-name="P1" draw:layer="layout" draw:type="curve" svg:x1="40.35cm" svg:y1="5.211cm" svg:x2="14.298cm" svg:y2="10.61cm" draw:start-shape="id7" draw:start-glue-point="2" draw:end-shape="id20" draw:end-glue-point="0" svg:d="M40350 5211c0 4089-26052 1390-26052 5399" svg:viewBox="0 0 26053 5400">
            <text:p/>
          </draw:connector>
          <draw:connector draw:style-name="gr5" draw:text-style-name="P1" draw:layer="layout" draw:type="curve" svg:x1="40.35cm" svg:y1="5.211cm" svg:x2="17.899cm" svg:y2="10.611cm" draw:start-shape="id7" draw:start-glue-point="2" draw:end-shape="id28" draw:end-glue-point="0" svg:d="M40350 5211c0 4090-22451 1391-22451 5400" svg:viewBox="0 0 22452 5401">
            <text:p/>
          </draw:connector>
          <draw:connector draw:style-name="gr5" draw:text-style-name="P1" draw:layer="layout" draw:type="curve" svg:x1="40.35cm" svg:y1="5.211cm" svg:x2="21.5cm" svg:y2="10.612cm" draw:start-shape="id7" draw:start-glue-point="2" draw:end-shape="id30" draw:end-glue-point="0" svg:d="M40350 5211c0 4090-18850 1390-18850 5401" svg:viewBox="0 0 18851 5402">
            <text:p/>
          </draw:connector>
          <draw:connector draw:style-name="gr5" draw:text-style-name="P1" draw:layer="layout" draw:type="curve" svg:x1="40.35cm" svg:y1="5.211cm" svg:x2="25.174cm" svg:y2="10.587cm" draw:start-shape="id7" draw:start-glue-point="2" draw:end-shape="id32" draw:end-glue-point="0" svg:d="M40350 5211c0 4072-15176 1385-15176 5376" svg:viewBox="0 0 15177 5377">
            <text:p/>
          </draw:connector>
          <draw:connector draw:style-name="gr5" draw:text-style-name="P1" draw:layer="layout" draw:type="curve" svg:x1="40.35cm" svg:y1="5.211cm" svg:x2="29.893cm" svg:y2="10.562cm" draw:start-shape="id7" draw:start-glue-point="2" draw:end-shape="id34" draw:end-glue-point="0" svg:d="M40350 5211c0 4053-10457 1378-10457 5351" svg:viewBox="0 0 10458 5352">
            <text:p/>
          </draw:connector>
          <draw:connector draw:style-name="gr3" draw:text-style-name="P1" draw:layer="layout" draw:type="curve" svg:x1="40.414cm" svg:y1="17.659cm" svg:x2="40.415cm" svg:y2="19.052cm" draw:start-shape="id37" draw:start-glue-point="2" draw:end-shape="id38" draw:end-glue-point="0" svg:d="M40414 17659c0 1045 1 349 1 1393" svg:viewBox="0 0 2 1394">
            <text:p/>
          </draw:connector>
          <draw:connector draw:style-name="gr3" draw:text-style-name="P1" draw:layer="layout" draw:type="curve" svg:x1="14.3cm" svg:y1="24.325cm" svg:x2="40.416cm" svg:y2="22.553cm" draw:start-shape="id39" draw:start-glue-point="2" draw:end-shape="id40" draw:end-glue-point="0" svg:d="M14300 24325c0 277 3265 554 6530 554 3264 0 6529-720 6529-1440 0-719 3264-1439 6529-1439 3264 0 6528 277 6528 553" svg:viewBox="0 0 26117 2880">
            <text:p/>
          </draw:connector>
          <draw:connector draw:style-name="gr3" draw:text-style-name="P1" draw:layer="layout" draw:type="curve" svg:x1="40.417cm" svg:y1="26.254cm" svg:x2="40.416cm" svg:y2="25.753cm" draw:start-shape="id41" draw:start-glue-point="0" draw:end-shape="id40" draw:end-glue-point="2" svg:d="M40417 26254c0-375-1-125-1-501" svg:viewBox="0 0 2 502">
            <text:p/>
          </draw:connector>
          <draw:connector draw:style-name="gr3" draw:text-style-name="P1" draw:layer="layout" draw:type="curve" svg:x1="40.415cm" svg:y1="29.255cm" svg:x2="40.417cm" svg:y2="28.794cm" draw:start-shape="id42" draw:start-glue-point="0" draw:end-shape="id41" draw:end-glue-point="2" svg:d="M40415 29255c0-345 2-115 2-461" svg:viewBox="0 0 3 462">
            <text:p/>
          </draw:connector>
          <draw:connector draw:style-name="gr3" draw:text-style-name="P1" draw:layer="layout" draw:type="curve" svg:x1="40.418cm" svg:y1="32.455cm" svg:x2="40.415cm" svg:y2="31.897cm" draw:start-shape="id4" draw:start-glue-point="0" draw:end-shape="id42" draw:end-glue-point="2" svg:d="M40418 32455c0-417-3-138-3-558" svg:viewBox="0 0 4 559">
            <text:p/>
          </draw:connector>
          <draw:connector draw:style-name="gr3" draw:text-style-name="P1" draw:layer="layout" draw:type="curve" svg:x1="40.419cm" svg:y1="40.256cm" svg:x2="40.415cm" svg:y2="39.637cm" draw:start-shape="id43" draw:start-glue-point="0" draw:end-shape="id3" draw:end-glue-point="2" svg:d="M40419 40256c0-463-4-154-4-619" svg:viewBox="0 0 5 620">
            <text:p/>
          </draw:connector>
          <draw:connector draw:style-name="gr3" draw:text-style-name="P1" draw:layer="layout" draw:type="curve" svg:x1="40.42cm" svg:y1="43.157cm" svg:x2="40.419cm" svg:y2="42.796cm" draw:start-shape="id44" draw:start-glue-point="0" draw:end-shape="id43" draw:end-glue-point="2" svg:d="M40420 43157c0-270-1-90-1-361" svg:viewBox="0 0 2 362">
            <text:p/>
          </draw:connector>
          <draw:connector draw:style-name="gr3" draw:text-style-name="P1" draw:layer="layout" draw:type="curve" svg:x1="40.422cm" svg:y1="58.459cm" svg:x2="40.421cm" svg:y2="57.998cm" draw:start-shape="id45" draw:start-glue-point="0" draw:end-shape="id46" draw:end-glue-point="2" svg:d="M40422 58459c0-345-1-115-1-461" svg:viewBox="0 0 2 462">
            <text:p/>
          </draw:connector>
          <draw:connector draw:style-name="gr3" draw:text-style-name="P1" draw:layer="layout" draw:type="curve" svg:x1="40.422cm" svg:y1="61.459cm" svg:x2="40.422cm" svg:y2="60.999cm" draw:start-shape="id47" draw:start-glue-point="0" draw:end-shape="id45" draw:end-glue-point="2" svg:d="M40422 61459v-460" svg:viewBox="0 0 1 461">
            <text:p/>
          </draw:connector>
          <draw:connector draw:style-name="gr3" draw:text-style-name="P1" draw:layer="layout" draw:type="curve" svg:x1="40.423cm" svg:y1="64.56cm" svg:x2="40.422cm" svg:y2="63.999cm" draw:start-shape="id48" draw:start-glue-point="0" draw:end-shape="id47" draw:end-glue-point="2" svg:d="M40423 64560c0-420-1-140-1-561" svg:viewBox="0 0 2 562">
            <text:p/>
          </draw:connector>
          <draw:connector draw:style-name="gr3" draw:text-style-name="P1" draw:layer="layout" draw:type="curve" svg:x1="31.925cm" svg:y1="70.762cm" svg:x2="40.423cm" svg:y2="67.1cm" draw:start-shape="id49" draw:start-glue-point="0" draw:end-shape="id48" draw:end-glue-point="2" svg:d="M31925 70762c0-2706 8498-875 8498-3662" svg:viewBox="0 0 8499 3663">
            <text:p/>
          </draw:connector>
          <draw:connector draw:style-name="gr3" draw:text-style-name="P1" draw:layer="layout" draw:type="curve" svg:x1="40.419cm" svg:y1="46.135cm" svg:x2="40.42cm" svg:y2="45.697cm" draw:start-shape="id50" draw:start-glue-point="0" draw:end-shape="id44" draw:end-glue-point="2" svg:d="M40419 46135c0-327 1-108 1-438" svg:viewBox="0 0 2 439">
            <text:p/>
          </draw:connector>
          <draw:connector draw:style-name="gr3" draw:text-style-name="P1" draw:layer="layout" draw:type="curve" svg:x1="40.42cm" svg:y1="49.657cm" svg:x2="40.419cm" svg:y2="49.285cm" draw:start-shape="id51" draw:start-glue-point="0" draw:end-shape="id50" draw:end-glue-point="2" svg:d="M40420 49657c0-277-1-92-1-372" svg:viewBox="0 0 2 373">
            <text:p/>
          </draw:connector>
          <draw:connector draw:style-name="gr3" draw:text-style-name="P1" draw:layer="layout" draw:type="curve" svg:x1="40.42cm" svg:y1="52.557cm" svg:x2="40.42cm" svg:y2="52.197cm" draw:start-shape="id52" draw:start-glue-point="0" draw:end-shape="id51" draw:end-glue-point="2" svg:d="M40420 52557v-360" svg:viewBox="0 0 1 361">
            <text:p/>
          </draw:connector>
          <draw:connector draw:style-name="gr3" draw:text-style-name="P1" draw:layer="layout" draw:type="curve" svg:x1="40.421cm" svg:y1="55.458cm" svg:x2="40.42cm" svg:y2="55.097cm" draw:start-shape="id46" draw:start-glue-point="0" draw:end-shape="id52" draw:end-glue-point="2" svg:d="M40421 55458c0-270-1-90-1-361" svg:viewBox="0 0 2 362">
            <text:p/>
          </draw:connector>
          <draw:connector draw:style-name="gr3" draw:text-style-name="P1" draw:layer="layout" draw:type="curve" svg:x1="35.924cm" svg:y1="70.761cm" svg:x2="40.423cm" svg:y2="67.1cm" draw:start-shape="id2" draw:end-shape="id48" draw:end-glue-point="2" svg:d="M35924 70761c0-2745 4499-915 4499-3661" svg:viewBox="0 0 4500 3662">
            <text:p/>
          </draw:connector>
          <draw:connector draw:style-name="gr3" draw:text-style-name="P1" draw:layer="layout" draw:type="curve" svg:x1="45.126cm" svg:y1="70.763cm" svg:x2="40.423cm" svg:y2="67.1cm" draw:start-shape="id53" draw:start-glue-point="0" draw:end-shape="id48" draw:end-glue-point="2" svg:d="M45126 70763c0-2746-4703-915-4703-3663" svg:viewBox="0 0 4704 3664">
            <text:p/>
          </draw:connector>
          <draw:connector draw:style-name="gr3" draw:text-style-name="P1" draw:layer="layout" draw:type="curve" svg:x1="48.827cm" svg:y1="70.764cm" svg:x2="40.423cm" svg:y2="67.1cm" draw:start-shape="id54" draw:start-glue-point="0" draw:end-shape="id48" draw:end-glue-point="2" svg:d="M48827 70764c0-2746-8404-915-8404-3664" svg:viewBox="0 0 8405 3665">
            <text:p/>
          </draw:connector>
          <draw:connector draw:style-name="gr2" draw:text-style-name="P1" draw:layer="layout" draw:type="curve" svg:x1="35.928cm" svg:y1="74.162cm" svg:x2="35.924cm" svg:y2="73.301cm" draw:start-shape="id55" draw:start-glue-point="0" draw:end-shape="id2" draw:end-glue-point="2" svg:d="M35928 74162c0-645-4-215-4-861" svg:viewBox="0 0 5 862">
            <text:p/>
          </draw:connector>
          <draw:connector draw:style-name="gr2" draw:text-style-name="P1" draw:layer="layout" draw:type="curve" svg:x1="23.327cm" svg:y1="80.764cm" svg:x2="35.928cm" svg:y2="78.836cm" draw:start-shape="id56" draw:start-glue-point="0" draw:end-shape="id55" draw:end-glue-point="2" svg:d="M23327 80764c0-1405 12601-442 12601-1928" svg:viewBox="0 0 12602 1929">
            <text:p/>
          </draw:connector>
          <draw:connector draw:style-name="gr2" draw:text-style-name="P1" draw:layer="layout" draw:type="curve" svg:x1="17.397cm" svg:y1="91.169cm" svg:x2="30.396cm" svg:y2="88.308cm" draw:start-shape="id57" draw:start-glue-point="0" draw:end-shape="id58" draw:end-glue-point="2" svg:d="M17397 91169c0-2145 12999-715 12999-2861" svg:viewBox="0 0 13000 2862">
            <text:p/>
          </draw:connector>
          <draw:connector draw:style-name="gr2" draw:text-style-name="P1" draw:layer="layout" draw:type="curve" svg:x1="21.113cm" svg:y1="91.165cm" svg:x2="30.396cm" svg:y2="88.308cm" draw:start-shape="id59" draw:start-glue-point="0" draw:end-shape="id58" draw:end-glue-point="2" svg:d="M21113 91165c0-2142 9283-714 9283-2857" svg:viewBox="0 0 9284 2858">
            <text:p/>
          </draw:connector>
          <draw:connector draw:style-name="gr2" draw:text-style-name="P1" draw:layer="layout" draw:type="curve" svg:x1="43.107cm" svg:y1="74.5cm" svg:x2="35.924cm" svg:y2="73.301cm" draw:start-shape="id60" draw:start-glue-point="0" draw:end-shape="id2" draw:end-glue-point="2" svg:d="M43107 74500c0-859-7183-260-7183-1199" svg:viewBox="0 0 7184 1200">
            <text:p/>
          </draw:connector>
          <draw:connector draw:style-name="gr2" draw:text-style-name="P1" draw:layer="layout" draw:type="curve" svg:x1="26.909cm" svg:y1="80.766cm" svg:x2="35.928cm" svg:y2="78.836cm" draw:start-shape="id61" draw:start-glue-point="0" draw:end-shape="id55" draw:end-glue-point="2" svg:d="M26909 80766c0-1408 9019-444 9019-1930" svg:viewBox="0 0 9020 1931">
            <text:p/>
          </draw:connector>
          <draw:connector draw:style-name="gr2" draw:text-style-name="P1" draw:layer="layout" draw:type="curve" svg:x1="35.928cm" svg:y1="78.836cm" svg:x2="30.528cm" svg:y2="80.765cm" draw:start-shape="id55" draw:start-glue-point="2" draw:end-shape="id62" draw:end-glue-point="0" svg:d="M35928 78836c0 1486-5400 522-5400 1929" svg:viewBox="0 0 5401 1930">
            <text:p/>
          </draw:connector>
          <draw:connector draw:style-name="gr2" draw:text-style-name="P1" draw:layer="layout" draw:type="curve" svg:x1="34.11cm" svg:y1="80.767cm" svg:x2="35.928cm" svg:y2="78.836cm" draw:start-shape="id63" draw:start-glue-point="0" draw:end-shape="id55" draw:end-glue-point="2" svg:d="M34110 80767c0-1408 1818-443 1818-1931" svg:viewBox="0 0 1819 1932">
            <text:p/>
          </draw:connector>
          <draw:connector draw:style-name="gr2" draw:text-style-name="P1" draw:layer="layout" draw:type="curve" svg:x1="24.814cm" svg:y1="91.166cm" svg:x2="30.396cm" svg:y2="88.308cm" draw:start-shape="id64" draw:start-glue-point="0" draw:end-shape="id58" draw:end-glue-point="2" svg:d="M24814 91166c0-2142 5582-713 5582-2858" svg:viewBox="0 0 5583 2859">
            <text:p/>
          </draw:connector>
          <draw:connector draw:style-name="gr2" draw:text-style-name="P1" draw:layer="layout" draw:type="curve" svg:x1="35.915cm" svg:y1="91.167cm" svg:x2="30.396cm" svg:y2="88.308cm" draw:start-shape="id65" draw:start-glue-point="0" draw:end-shape="id58" draw:end-glue-point="2" svg:d="M35915 91167c0-2143-5519-714-5519-2859" svg:viewBox="0 0 5520 2860">
            <text:p/>
          </draw:connector>
          <draw:connector draw:style-name="gr2" draw:text-style-name="P1" draw:layer="layout" draw:type="curve" svg:x1="39.715cm" svg:y1="91.167cm" svg:x2="30.396cm" svg:y2="88.308cm" draw:start-shape="id66" draw:start-glue-point="0" draw:end-shape="id58" draw:end-glue-point="2" svg:d="M39715 91167c0-2143-9319-714-9319-2859" svg:viewBox="0 0 9320 2860">
            <text:p/>
          </draw:connector>
          <draw:connector draw:style-name="gr2" draw:text-style-name="P1" draw:layer="layout" draw:type="curve" svg:x1="43.416cm" svg:y1="91.168cm" svg:x2="30.396cm" svg:y2="88.308cm" draw:start-shape="id67" draw:start-glue-point="0" draw:end-shape="id58" draw:end-glue-point="2" svg:d="M43416 91168c0-2143-13020-714-13020-2860" svg:viewBox="0 0 13021 2861">
            <text:p/>
          </draw:connector>
          <draw:connector draw:style-name="gr2" draw:text-style-name="P1" draw:layer="layout" draw:type="curve" svg:x1="37.826cm" svg:y1="80.763cm" svg:x2="35.928cm" svg:y2="78.836cm" draw:start-shape="id68" draw:start-glue-point="0" draw:end-shape="id55" draw:end-glue-point="2" svg:d="M37826 80763c0-1405-1898-442-1898-1927" svg:viewBox="0 0 1899 1928">
            <text:p/>
          </draw:connector>
          <draw:connector draw:style-name="gr2" draw:text-style-name="P1" draw:layer="layout" draw:type="curve" svg:x1="41.408cm" svg:y1="80.765cm" svg:x2="35.928cm" svg:y2="78.836cm" draw:start-shape="id69" draw:start-glue-point="0" draw:end-shape="id55" draw:end-glue-point="2" svg:d="M41408 80765c0-1407-5480-443-5480-1929" svg:viewBox="0 0 5481 1930">
            <text:p/>
          </draw:connector>
          <draw:connector draw:style-name="gr2" draw:text-style-name="P1" draw:layer="layout" draw:type="curve" svg:x1="45.027cm" svg:y1="80.764cm" svg:x2="35.928cm" svg:y2="78.836cm" draw:start-shape="id70" draw:start-glue-point="0" draw:end-shape="id55" draw:end-glue-point="2" svg:d="M45027 80764c0-1405-9099-442-9099-1928" svg:viewBox="0 0 9100 1929">
            <text:p/>
          </draw:connector>
          <draw:connector draw:style-name="gr2" draw:text-style-name="P1" draw:layer="layout" draw:type="curve" svg:x1="48.609cm" svg:y1="80.766cm" svg:x2="35.928cm" svg:y2="78.836cm" draw:start-shape="id71" draw:start-glue-point="0" draw:end-shape="id55" draw:end-glue-point="2" svg:d="M48609 80766c0-1407-12681-442-12681-1930" svg:viewBox="0 0 12682 1931">
            <text:p/>
          </draw:connector>
          <draw:connector draw:style-name="gr2" draw:text-style-name="P1" draw:layer="layout" draw:type="curve" svg:x1="30.396cm" svg:y1="85.768cm" svg:x2="34.11cm" svg:y2="83.307cm" draw:start-shape="id58" draw:start-glue-point="0" draw:end-shape="id63" draw:end-glue-point="2" svg:d="M30396 85768c0-1845 3714-615 3714-2461" svg:viewBox="0 0 3715 2462">
            <text:p/>
          </draw:connector>
          <draw:connector draw:style-name="gr2" draw:text-style-name="P1" draw:layer="layout" draw:type="curve" svg:x1="34.112cm" svg:y1="85.764cm" svg:x2="34.11cm" svg:y2="83.307cm" draw:start-shape="id72" draw:start-glue-point="0" draw:end-shape="id63" draw:end-glue-point="2" svg:d="M34112 85764c0-1842-2-614-2-2457" svg:viewBox="0 0 3 2458">
            <text:p/>
          </draw:connector>
          <draw:connector draw:style-name="gr2" draw:text-style-name="P1" draw:layer="layout" draw:type="curve" svg:x1="28.498cm" svg:y1="91.17cm" svg:x2="30.396cm" svg:y2="88.308cm" draw:start-shape="id73" draw:start-glue-point="0" draw:end-shape="id58" draw:end-glue-point="2" svg:d="M28498 91170c0-2145 1898-714 1898-2862" svg:viewBox="0 0 1899 2863">
            <text:p/>
          </draw:connector>
          <draw:connector draw:style-name="gr2" draw:text-style-name="P1" draw:layer="layout" draw:type="curve" svg:x1="32.214cm" svg:y1="91.166cm" svg:x2="30.396cm" svg:y2="88.308cm" draw:start-shape="id74" draw:start-glue-point="0" draw:end-shape="id58" draw:end-glue-point="2" svg:d="M32214 91166c0-2142-1818-713-1818-2858" svg:viewBox="0 0 1819 2859">
            <text:p/>
          </draw:connector>
          <draw:connector draw:style-name="gr2" draw:text-style-name="P1" draw:layer="layout" draw:type="curve" svg:x1="21.113cm" svg:y1="96.065cm" svg:x2="21.113cm" svg:y2="93.705cm" draw:start-shape="id75" draw:start-glue-point="0" draw:end-shape="id59" draw:end-glue-point="2" svg:d="M21113 96065v-2360" svg:viewBox="0 0 1 2361">
            <text:p/>
          </draw:connector>
          <draw:connector draw:style-name="gr2" draw:text-style-name="P1" draw:layer="layout" draw:type="curve" svg:x1="39.274cm" svg:y1="103.267cm" svg:x2="39.274cm" svg:y2="101.709cm" draw:start-shape="id76" draw:start-glue-point="0" draw:end-shape="id77" draw:end-glue-point="2" svg:d="M39274 103267v-1558" svg:viewBox="0 0 1 1559">
            <text:p/>
          </draw:connector>
          <draw:connector draw:style-name="gr2" draw:text-style-name="P1" draw:layer="layout" draw:type="curve" svg:x1="32.073cm" svg:y1="103.266cm" svg:x2="39.274cm" svg:y2="101.709cm" draw:start-shape="id78" draw:start-glue-point="0" draw:end-shape="id77" draw:end-glue-point="2" svg:d="M32073 103266c0-1167 7201-389 7201-1557" svg:viewBox="0 0 7202 1558">
            <text:p/>
          </draw:connector>
          <draw:connector draw:style-name="gr2" draw:text-style-name="P1" draw:layer="layout" draw:type="curve" svg:x1="39.283cm" svg:y1="107.468cm" svg:x2="42.856cm" svg:y2="105.809cm" draw:start-shape="id79" draw:start-glue-point="0" draw:end-shape="id80" draw:end-glue-point="2" svg:d="M39283 107468c0-1243 3573-414 3573-1659" svg:viewBox="0 0 3574 1660">
            <text:p/>
          </draw:connector>
          <draw:connector draw:style-name="gr2" draw:text-style-name="P1" draw:layer="layout" draw:type="curve" svg:x1="39.274cm" svg:y1="99.169cm" svg:x2="39.27cm" svg:y2="98.606cm" draw:start-shape="id77" draw:start-glue-point="0" draw:end-shape="id81" draw:end-glue-point="2" svg:d="M39274 99169c0-421-4-140-4-563" svg:viewBox="0 0 5 564">
            <text:p/>
          </draw:connector>
          <draw:connector draw:style-name="gr2" draw:text-style-name="P1" draw:layer="layout" draw:type="curve" svg:x1="35.655cm" svg:y1="103.268cm" svg:x2="39.274cm" svg:y2="101.709cm" draw:start-shape="id82" draw:start-glue-point="0" draw:end-shape="id77" draw:end-glue-point="2" svg:d="M35655 103268c0-1168 3619-389 3619-1559" svg:viewBox="0 0 3620 1560">
            <text:p/>
          </draw:connector>
          <draw:connector draw:style-name="gr2" draw:text-style-name="P1" draw:layer="layout" draw:type="curve" svg:x1="42.856cm" svg:y1="103.269cm" svg:x2="39.274cm" svg:y2="101.709cm" draw:start-shape="id80" draw:start-glue-point="0" draw:end-shape="id77" draw:end-glue-point="2" svg:d="M42856 103269c0-1168-3582-389-3582-1560" svg:viewBox="0 0 3583 1561">
            <text:p/>
          </draw:connector>
          <draw:connector draw:style-name="gr2" draw:text-style-name="P1" draw:layer="layout" draw:type="curve" svg:x1="46.572cm" svg:y1="103.265cm" svg:x2="39.274cm" svg:y2="101.709cm" draw:start-shape="id83" draw:start-glue-point="0" draw:end-shape="id77" draw:end-glue-point="2" svg:d="M46572 103265c0-1165-7298-388-7298-1556" svg:viewBox="0 0 7299 1557">
            <text:p/>
          </draw:connector>
          <draw:connector draw:style-name="gr2" draw:text-style-name="P1" draw:layer="layout" draw:type="curve" svg:x1="46.581cm" svg:y1="107.466cm" svg:x2="42.856cm" svg:y2="105.809cm" draw:start-shape="id84" draw:start-glue-point="0" draw:end-shape="id80" draw:end-glue-point="2" svg:d="M46581 107466c0-1242-3725-414-3725-1657" svg:viewBox="0 0 3726 1658">
            <text:p/>
          </draw:connector>
          <draw:connector draw:style-name="gr2" draw:text-style-name="P1" draw:layer="layout" draw:type="curve" svg:x1="24.695cm" svg:y1="96.067cm" svg:x2="21.113cm" svg:y2="93.705cm" draw:start-shape="id85" draw:start-glue-point="0" draw:end-shape="id59" draw:end-glue-point="2" svg:d="M24695 96067c0-1770-3582-589-3582-2362" svg:viewBox="0 0 3583 2363">
            <text:p/>
          </draw:connector>
          <draw:connector draw:style-name="gr2" draw:text-style-name="P1" draw:layer="layout" draw:type="curve" svg:x1="28.314cm" svg:y1="96.066cm" svg:x2="21.113cm" svg:y2="93.705cm" draw:start-shape="id86" draw:start-glue-point="0" draw:end-shape="id59" draw:end-glue-point="2" svg:d="M28314 96066c0-1770-7201-590-7201-2361" svg:viewBox="0 0 7202 2362">
            <text:p/>
          </draw:connector>
          <draw:connector draw:style-name="gr2" draw:text-style-name="P1" draw:layer="layout" draw:type="curve" svg:x1="50.408cm" svg:y1="111.967cm" svg:x2="39.283cm" svg:y2="110.008cm" draw:start-shape="id87" draw:start-glue-point="0" draw:end-shape="id79" draw:end-glue-point="2" svg:d="M50408 111967c0-1468-11125-489-11125-1959" svg:viewBox="0 0 11126 1960">
            <text:p/>
          </draw:connector>
          <draw:connector draw:style-name="gr2" draw:text-style-name="P1" draw:layer="layout" draw:type="curve" svg:x1="42.865cm" svg:y1="107.47cm" svg:x2="42.856cm" svg:y2="105.809cm" draw:start-shape="id88" draw:start-glue-point="0" draw:end-shape="id80" draw:end-glue-point="2" svg:d="M42865 107470c0-1245-9-415-9-1661" svg:viewBox="0 0 10 1662">
            <text:p/>
          </draw:connector>
          <draw:connector draw:style-name="gr2" draw:text-style-name="P1" draw:layer="layout" draw:type="curve" svg:x1="39.27cm" svg:y1="96.066cm" svg:x2="21.113cm" svg:y2="93.705cm" draw:start-shape="id81" draw:start-glue-point="0" draw:end-shape="id59" draw:end-glue-point="2" svg:d="M39270 96066c0-1770-18157-590-18157-2361" svg:viewBox="0 0 18158 2362">
            <text:p/>
          </draw:connector>
          <draw:connector draw:style-name="gr2" draw:text-style-name="P1" draw:layer="layout" draw:type="curve" svg:x1="28.508cm" svg:y1="111.967cm" svg:x2="39.283cm" svg:y2="110.008cm" draw:start-shape="id89" draw:start-glue-point="0" draw:end-shape="id79" draw:end-glue-point="2" svg:d="M28508 111967c0-1468 10775-489 10775-1959" svg:viewBox="0 0 10776 1960">
            <text:p/>
          </draw:connector>
          <draw:connector draw:style-name="gr2" draw:text-style-name="P1" draw:layer="layout" draw:type="curve" svg:x1="32.09cm" svg:y1="111.969cm" svg:x2="39.283cm" svg:y2="110.008cm" draw:start-shape="id90" draw:start-glue-point="0" draw:end-shape="id79" draw:end-glue-point="2" svg:d="M32090 111969c0-1470 7193-490 7193-1961" svg:viewBox="0 0 7194 1962">
            <text:p/>
          </draw:connector>
          <draw:connector draw:style-name="gr2" draw:text-style-name="P1" draw:layer="layout" draw:type="curve" svg:x1="35.709cm" svg:y1="111.968cm" svg:x2="39.283cm" svg:y2="110.008cm" draw:start-shape="id91" draw:start-glue-point="0" draw:end-shape="id79" draw:end-glue-point="2" svg:d="M35709 111968c0-1468 3574-489 3574-1960" svg:viewBox="0 0 3575 1961">
            <text:p/>
          </draw:connector>
          <draw:connector draw:style-name="gr2" draw:text-style-name="P1" draw:layer="layout" draw:type="curve" svg:x1="39.291cm" svg:y1="111.97cm" svg:x2="39.283cm" svg:y2="110.008cm" draw:start-shape="id92" draw:start-glue-point="0" draw:end-shape="id79" draw:end-glue-point="2" svg:d="M39291 111970c0-1470-8-489-8-1962" svg:viewBox="0 0 9 1963">
            <text:p/>
          </draw:connector>
          <draw:connector draw:style-name="gr2" draw:text-style-name="P1" draw:layer="layout" draw:type="curve" svg:x1="43.007cm" svg:y1="111.966cm" svg:x2="39.283cm" svg:y2="110.008cm" draw:start-shape="id93" draw:start-glue-point="0" draw:end-shape="id79" draw:end-glue-point="2" svg:d="M43007 111966c0-1467-3724-488-3724-1958" svg:viewBox="0 0 3725 1959">
            <text:p/>
          </draw:connector>
          <draw:connector draw:style-name="gr2" draw:text-style-name="P1" draw:layer="layout" draw:type="curve" svg:x1="46.692cm" svg:y1="111.971cm" svg:x2="39.283cm" svg:y2="110.008cm" draw:start-shape="id94" draw:start-glue-point="0" draw:end-shape="id79" draw:end-glue-point="2" svg:d="M46692 111971c0-1471-7409-490-7409-1963" svg:viewBox="0 0 7410 1964">
            <text:p/>
          </draw:connector>
          <draw:connector draw:style-name="gr2" draw:text-style-name="P1" draw:layer="layout" draw:type="curve" svg:x1="31.896cm" svg:y1="96.068cm" svg:x2="21.113cm" svg:y2="93.705cm" draw:start-shape="id95" draw:start-glue-point="0" draw:end-shape="id59" draw:end-glue-point="2" svg:d="M31896 96068c0-1771-10783-590-10783-2363" svg:viewBox="0 0 10784 2364">
            <text:p/>
          </draw:connector>
          <draw:connector draw:style-name="gr2" draw:text-style-name="P1" draw:layer="layout" draw:type="curve" svg:x1="35.612cm" svg:y1="96.064cm" svg:x2="21.113cm" svg:y2="93.705cm" draw:start-shape="id96" draw:start-glue-point="0" draw:end-shape="id59" draw:end-glue-point="2" svg:d="M35612 96064c0-1768-14499-589-14499-2359" svg:viewBox="0 0 14500 2360">
            <text:p/>
          </draw:connector>
          <draw:connector draw:style-name="gr6" draw:text-style-name="P1" draw:layer="layout" draw:type="curve" svg:x1="26.909cm" svg:y1="84.373cm" svg:x2="30.396cm" svg:y2="85.768cm" draw:start-shape="id61" draw:start-glue-point="2" draw:end-shape="id58" draw:end-glue-point="0" svg:d="M26909 84373c0 1047 3487 350 3487 1395" svg:viewBox="0 0 3488 1396">
            <text:p/>
          </draw:connector>
          <draw:connector draw:style-name="gr5" draw:text-style-name="P1" draw:layer="layout" draw:type="curve" svg:x1="38.891cm" svg:y1="20.322cm" svg:x2="15.824cm" svg:y2="23.004cm" draw:start-shape="id38" draw:start-glue-point="3" draw:end-shape="id39" draw:end-glue-point="1" svg:d="M38891 20322c-17298 0-5765 2682-23067 2682" svg:viewBox="0 0 23068 2683">
            <text:p/>
          </draw:connector>
          <draw:connector draw:style-name="gr5" draw:text-style-name="P1" draw:layer="layout" draw:type="curve" svg:x1="14.3cm" svg:y1="17.712cm" svg:x2="14.296cm" svg:y2="18.484cm" draw:start-shape="id26" draw:start-glue-point="2" draw:end-shape="id97" draw:end-glue-point="0" svg:d="M14300 17712c0 580-4 195-4 772" svg:viewBox="0 0 5 773">
            <text:p/>
          </draw:connector>
          <draw:connector draw:style-name="gr3" draw:text-style-name="P1" draw:layer="layout" draw:type="curve" svg:x1="14.3cm" svg:y1="21.683cm" svg:x2="14.296cm" svg:y2="21.024cm" draw:start-shape="id39" draw:start-glue-point="0" draw:end-shape="id97" draw:end-glue-point="2" svg:d="M14300 21683c0-532-4-203-4-659" svg:viewBox="0 0 5 660">
            <text:p/>
          </draw:connector>
          <draw:connector draw:style-name="gr3" draw:text-style-name="P1" draw:layer="layout" draw:type="curve" svg:x1="83.721cm" svg:y1="17.656cm" svg:x2="83.724cm" svg:y2="19.019cm" draw:start-shape="id17" draw:start-glue-point="2" draw:end-shape="id98" draw:end-glue-point="0" svg:d="M83721 17656c0 1023 3 342 3 1363" svg:viewBox="0 0 4 1364">
            <text:p/>
          </draw:connector>
          <draw:connector draw:style-name="gr5" draw:text-style-name="P1" draw:layer="layout" draw:type="curve" svg:x1="41.939cm" svg:y1="20.322cm" svg:x2="82.2cm" svg:y2="20.289cm" draw:start-shape="id38" draw:start-glue-point="1" draw:end-shape="id98" draw:end-glue-point="3" svg:d="M41939 20322c30235 0 10105-33 40261-33" svg:viewBox="0 0 40262 34">
            <text:p/>
          </draw:connector>
          <draw:custom-shape draw:style-name="gr7" draw:text-style-name="P3" xml:id="id18" draw:id="id18" draw:layer="layout" svg:width="10.947cm" svg:height="4.767cm" svg:x="50.049cm" svg:y="14.848cm">
            <text:p text:style-name="P2"><text:span text:style-name="T1">These three sons of David are not listed in </text:span><text:span text:style-name="T2">2Sa 5:14-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5" draw:layer="layout" svg:width="49.979cm" svg:height="3.298cm" svg:x="27.967cm" svg:y="14.736cm">
            <text:p text:style-name="P4"><text:span text:style-name="T1">Born</text:span></text:p>
            <text:p text:style-name="P4"><text:span text:style-name="T1">in</text:span></text:p>
            <text:p text:style-name="P4"><text:span text:style-name="T1">Jerusal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7" xml:id="id7" draw:id="id7" draw:layer="layout" svg:width="3.048cm" svg:height="2.54cm" svg:x="38.826cm" svg:y="2.671cm">
            <text:p text:style-name="P6"><text:span text:style-name="T3">David</text:span></text:p>
            <text:p text:style-name="P6"><text:span text:style-name="T4">1Ch 3:1</text:span></text:p>
            <text:p text:style-name="P6"><text:span text:style-name="T4">1Ch 2:1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7" xml:id="id23" draw:id="id23" draw:layer="layout" svg:width="3.048cm" svg:height="2.54cm" svg:x="5.658cm" svg:y="15.154cm">
            <text:p text:style-name="P6"><text:span text:style-name="T5">Amnon</text:span></text:p>
            <text:p text:style-name="P6"><text:span text:style-name="T4">1Ch 3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22" draw:id="id22" draw:layer="layout" svg:width="3.048cm" svg:height="2.54cm" svg:x="5.658cm" svg:y="10.609cm">
            <text:p text:style-name="P6"><text:span text:style-name="T3">Ahinoam</text:span></text:p>
            <text:p text:style-name="P6"><text:span text:style-name="T6">Jezreelitess</text:span></text:p>
            <text:p text:style-name="P6"><text:span text:style-name="T4">1Ch 3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25" draw:id="id25" draw:layer="layout" svg:width="3.048cm" svg:height="2.54cm" svg:x="9.173cm" svg:y="10.609cm">
            <text:p text:style-name="P6"><text:span text:style-name="T3">Abigail</text:span></text:p>
            <text:p text:style-name="P6"><text:span text:style-name="T6">Carmelitess</text:span></text:p>
            <text:p text:style-name="P6"><text:span text:style-name="T4">1Ch 3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24" draw:id="id24" draw:layer="layout" svg:width="3.048cm" svg:height="2.54cm" svg:x="9.17cm" svg:y="15.171cm">
            <text:p text:style-name="P9"><text:span text:style-name="T7">Daniel</text:span></text:p>
            <text:p text:style-name="P9"><text:span text:style-name="T8">1Ch 3:1</text:span></text:p>
            <text:p text:style-name="P10"><text:span text:style-name="T7">Chileab</text:span></text:p>
            <text:p text:style-name="P10"><text:span text:style-name="T8">2Sa 3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26" draw:id="id26" draw:layer="layout" svg:width="3.048cm" svg:height="2.54cm" svg:x="12.776cm" svg:y="15.172cm">
            <text:p text:style-name="P9"><text:span text:style-name="T7">Absalom</text:span></text:p>
            <text:p text:style-name="P9"><text:span text:style-name="T8">1Ch 3:2</text:span></text:p>
            <text:p text:style-name="P10"><text:span text:style-name="T7">Abishalom</text:span></text:p>
            <text:p text:style-name="P10"><text:span text:style-name="T8">1Ki 15: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20" draw:id="id20" draw:layer="layout" svg:width="3.048cm" svg:height="2.54cm" svg:x="12.774cm" svg:y="10.61cm">
            <text:p text:style-name="P6"><text:span text:style-name="T3">Maachah</text:span></text:p>
            <text:p text:style-name="P6"><text:span text:style-name="T4">1Ch 3: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7" xml:id="id21" draw:id="id21" draw:layer="layout" svg:width="3.048cm" svg:height="2.54cm" svg:x="12.796cm" svg:y="2.671cm">
            <text:p text:style-name="P6"><text:span text:style-name="T3">Talmai </text:span><text:span text:style-name="T6">king of Geshur</text:span></text:p>
            <text:p text:style-name="P6"><text:span text:style-name="T4">1Ch 3: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28" draw:id="id28" draw:layer="layout" svg:width="3.048cm" svg:height="2.54cm" svg:x="16.375cm" svg:y="10.611cm">
            <text:p text:style-name="P6"><text:span text:style-name="T3">Haggith</text:span></text:p>
            <text:p text:style-name="P6"><text:span text:style-name="T4">1Ch 3: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27" draw:id="id27" draw:layer="layout" svg:width="3.048cm" svg:height="2.54cm" svg:x="16.377cm" svg:y="15.171cm">
            <text:p text:style-name="P9"><text:span text:style-name="T7">Adonijah</text:span></text:p>
            <text:p text:style-name="P9"><text:span text:style-name="T8">1Ch 3: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30" draw:id="id30" draw:layer="layout" svg:width="3.048cm" svg:height="2.54cm" svg:x="19.976cm" svg:y="10.612cm">
            <text:p text:style-name="P6"><text:span text:style-name="T3">Abital</text:span></text:p>
            <text:p text:style-name="P6"><text:span text:style-name="T4">1Ch 3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2" draw:text-style-name="P11" xml:id="id29" draw:id="id29" draw:layer="layout" svg:width="3.099cm" svg:height="2.54cm" svg:x="19.954cm" svg:y="15.146cm">
            <text:p text:style-name="P9"><text:span text:style-name="T7">Shephatiah</text:span></text:p>
            <text:p text:style-name="P9"><text:span text:style-name="T8">1Ch 3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32" draw:id="id32" draw:layer="layout" svg:width="3.048cm" svg:height="2.54cm" svg:x="23.65cm" svg:y="10.587cm">
            <text:p text:style-name="P6"><text:span text:style-name="T3">Eglah</text:span></text:p>
            <text:p text:style-name="P6"><text:span text:style-name="T4">1Ch 3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31" draw:id="id31" draw:layer="layout" svg:width="3.048cm" svg:height="2.54cm" svg:x="23.653cm" svg:y="15.121cm">
            <text:p text:style-name="P9"><text:span text:style-name="T7">Ithream</text:span></text:p>
            <text:p text:style-name="P9"><text:span text:style-name="T8">1Ch 3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3" draw:text-style-name="P13" draw:layer="layout" svg:width="23.667cm" svg:height="3.132cm" svg:x="3.653cm" svg:y="14.816cm">
            <text:p text:style-name="P12"><text:span text:style-name="T1">Born</text:span></text:p>
            <text:p text:style-name="P12"><text:span text:style-name="T1">in</text:span></text:p>
            <text:p text:style-name="P12"><text:span text:style-name="T1">Hebr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34" draw:id="id34" draw:layer="layout" svg:width="3.048cm" svg:height="2.54cm" svg:x="28.369cm" svg:y="10.562cm">
            <text:p text:style-name="P6"><text:span text:style-name="T3">Bath-shua</text:span></text:p>
            <text:p text:style-name="P6"><text:span text:style-name="T4">1Ch 3:5</text:span></text:p>
            <text:p text:style-name="P14"><text:span text:style-name="T3">Bath-sheba</text:span></text:p>
            <text:p text:style-name="P14"><text:span text:style-name="T4">2Sa 11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33" draw:id="id33" draw:layer="layout" svg:width="3.048cm" svg:height="2.54cm" svg:x="28.388cm" svg:y="15.117cm">
            <text:p text:style-name="P9"><text:span text:style-name="T7">Shimea</text:span></text:p>
            <text:p text:style-name="P9"><text:span text:style-name="T8">1Ch 3:5</text:span></text:p>
            <text:p text:style-name="P10"><text:span text:style-name="T7">Shammua</text:span></text:p>
            <text:p text:style-name="P10"><text:span text:style-name="T8">2Sa 5:13</text:span></text:p>
            <text:p text:style-name="P10"><text:span text:style-name="T8">1Ch 14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35" draw:id="id35" draw:layer="layout" svg:width="3.048cm" svg:height="2.54cm" svg:x="31.889cm" svg:y="15.118cm">
            <text:p text:style-name="P9"><text:span text:style-name="T7">Shobab</text:span></text:p>
            <text:p text:style-name="P9"><text:span text:style-name="T8">1Ch 3: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36" draw:id="id36" draw:layer="layout" svg:width="3.048cm" svg:height="2.54cm" svg:x="35.389cm" svg:y="15.118cm">
            <text:p text:style-name="P9"><text:span text:style-name="T7">Nathan</text:span></text:p>
            <text:p text:style-name="P9"><text:span text:style-name="T8">1Ch 3: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37" draw:id="id37" draw:layer="layout" svg:width="3.048cm" svg:height="2.54cm" svg:x="38.89cm" svg:y="15.119cm">
            <text:p text:style-name="P9"><text:span text:style-name="T7">Solomon</text:span></text:p>
            <text:p text:style-name="P9"><text:span text:style-name="T8">1Ch 3:5</text:span></text:p>
            <text:p text:style-name="P10"><text:span text:style-name="T7">Jedidiah</text:span></text:p>
            <text:p text:style-name="P10"><text:span text:style-name="T8">2Sa 12:2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8" draw:id="id8" draw:layer="layout" svg:width="3.048cm" svg:height="2.54cm" svg:x="43.094cm" svg:y="15.113cm">
            <text:p text:style-name="P9"><text:span text:style-name="T7">Ibhar</text:span></text:p>
            <text:p text:style-name="P9"><text:span text:style-name="T8">1Ch 3: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9" draw:id="id9" draw:layer="layout" svg:width="3.048cm" svg:height="2.54cm" svg:x="46.695cm" svg:y="15.114cm">
            <text:p text:style-name="P9"><text:span text:style-name="T7">Elishama</text:span></text:p>
            <text:p text:style-name="P9"><text:span text:style-name="T8">1Ch 3:6</text:span></text:p>
            <text:p text:style-name="P10"><text:span text:style-name="T7">Elishua</text:span></text:p>
            <text:p text:style-name="P10"><text:span text:style-name="T8">2Sa 5:15</text:span></text:p>
            <text:p text:style-name="P10"><text:span text:style-name="T8">1Ch 14: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0" draw:id="id10" draw:layer="layout" svg:width="3.048cm" svg:height="2.54cm" svg:x="50.295cm" svg:y="15.114cm">
            <text:p text:style-name="P9"><text:span text:style-name="T7">Eliphelet</text:span></text:p>
            <text:p text:style-name="P9"><text:span text:style-name="T8">1Ch 3:6</text:span></text:p>
            <text:p text:style-name="P10"><text:span text:style-name="T7">Elpalet</text:span></text:p>
            <text:p text:style-name="P10"><text:span text:style-name="T8">1Ch 14: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1" draw:id="id11" draw:layer="layout" svg:width="3.048cm" svg:height="2.54cm" svg:x="53.996cm" svg:y="15.115cm">
            <text:p text:style-name="P9"><text:span text:style-name="T7">Nogah</text:span></text:p>
            <text:p text:style-name="P9"><text:span text:style-name="T8">1Ch 3: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2" draw:id="id12" draw:layer="layout" svg:width="3.048cm" svg:height="2.54cm" svg:x="57.695cm" svg:y="15.114cm">
            <text:p text:style-name="P9"><text:span text:style-name="T7">Nepheg</text:span></text:p>
            <text:p text:style-name="P9"><text:span text:style-name="T8">1Ch 3: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3" draw:id="id13" draw:layer="layout" svg:width="3.048cm" svg:height="2.54cm" svg:x="61.396cm" svg:y="15.115cm">
            <text:p text:style-name="P9"><text:span text:style-name="T7">Japhia</text:span></text:p>
            <text:p text:style-name="P9"><text:span text:style-name="T8">1Ch 3: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4" draw:id="id14" draw:layer="layout" svg:width="3.048cm" svg:height="2.54cm" svg:x="65.096cm" svg:y="15.115cm">
            <text:p text:style-name="P9"><text:span text:style-name="T7">Elishama</text:span></text:p>
            <text:p text:style-name="P9"><text:span text:style-name="T8">1Ch 3: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5" draw:id="id15" draw:layer="layout" svg:width="3.048cm" svg:height="2.54cm" svg:x="68.797cm" svg:y="15.116cm">
            <text:p text:style-name="P9"><text:span text:style-name="T7">Eliada</text:span></text:p>
            <text:p text:style-name="P9"><text:span text:style-name="T8">1Ch 3:8</text:span></text:p>
            <text:p text:style-name="P10"><text:span text:style-name="T7">Beeliada</text:span></text:p>
            <text:p text:style-name="P10"><text:span text:style-name="T8">1Ch 14: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6" draw:id="id16" draw:layer="layout" svg:width="3.048cm" svg:height="2.54cm" svg:x="72.498cm" svg:y="15.117cm">
            <text:p text:style-name="P9"><text:span text:style-name="T7">Eliphelet</text:span></text:p>
            <text:p text:style-name="P9"><text:span text:style-name="T8">1Ch 3:8</text:span></text:p>
            <text:p text:style-name="P10"><text:span text:style-name="T7">Eliphalet</text:span></text:p>
            <text:p text:style-name="P10"><text:span text:style-name="T8">2Sa 5:16</text:span></text:p>
            <text:p text:style-name="P10"><text:span text:style-name="T8">1Ch 14: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4" draw:text-style-name="P15" xml:id="id6" draw:id="id6" draw:layer="layout" svg:width="3.048cm" svg:height="2.54cm" svg:x="78.399cm" svg:y="15.118cm">
            <text:p text:style-name="P9"><text:span text:style-name="T7">Tamar</text:span></text:p>
            <text:p text:style-name="P9"><text:span text:style-name="T8">1Ch 3: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38" draw:id="id38" draw:layer="layout" svg:width="3.048cm" svg:height="2.54cm" svg:x="38.891cm" svg:y="19.052cm">
            <text:p text:style-name="P9"><text:span text:style-name="T7">Rehoboam</text:span></text:p>
            <text:p text:style-name="P9"><text:span text:style-name="T8">1Ch 3:10</text:span></text:p>
            <text:p text:style-name="P10"><text:span text:style-name="T7">Roboam</text:span></text:p>
            <text:p text:style-name="P10"><text:span text:style-name="T8">Mat 1: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5" draw:text-style-name="P11" xml:id="id40" draw:id="id40" draw:layer="layout" svg:width="3.048cm" svg:height="3.2cm" svg:x="38.892cm" svg:y="22.553cm">
            <text:p text:style-name="P9"><text:span text:style-name="T7">Abia</text:span></text:p>
            <text:p text:style-name="P9"><text:span text:style-name="T8">1Ch 3:10</text:span></text:p>
            <text:p text:style-name="P10"><text:span text:style-name="T7">Abijam</text:span></text:p>
            <text:p text:style-name="P10"><text:span text:style-name="T8">1Ki 14:31</text:span></text:p>
            <text:p text:style-name="P10"><text:span text:style-name="T7">Abijah</text:span></text:p>
            <text:p text:style-name="P10"><text:span text:style-name="T8">2Ch 12: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41" draw:id="id41" draw:layer="layout" svg:width="3.048cm" svg:height="2.54cm" svg:x="38.893cm" svg:y="26.254cm">
            <text:p text:style-name="P9"><text:span text:style-name="T7">Asa</text:span></text:p>
            <text:p text:style-name="P9"><text:span text:style-name="T8">1Ch 3:10</text:span></text:p>
            <text:p text:style-name="P9"><text:span text:style-name="T8">1Ki 15:8</text:span></text:p>
            <text:p text:style-name="P9"><text:span text:style-name="T8">2Ch 14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6" draw:text-style-name="P11" xml:id="id42" draw:id="id42" draw:layer="layout" svg:width="3.708cm" svg:height="2.642cm" svg:x="38.561cm" svg:y="29.255cm">
            <text:p text:style-name="P9"><text:span text:style-name="T7">Jehosphaphat</text:span></text:p>
            <text:p text:style-name="P9"><text:span text:style-name="T8">1Ch 3:10</text:span></text:p>
            <text:p text:style-name="P9"><text:span text:style-name="T8">1Ki 15:24</text:span></text:p>
            <text:p text:style-name="P10"><text:span text:style-name="T7">Josaphat</text:span></text:p>
            <text:p text:style-name="P10"><text:span text:style-name="T8">Mat 1: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4" draw:id="id4" draw:layer="layout" svg:width="3.048cm" svg:height="2.54cm" svg:x="38.894cm" svg:y="32.455cm">
            <text:p text:style-name="P9"><text:span text:style-name="T7">Joram</text:span></text:p>
            <text:p text:style-name="P9"><text:span text:style-name="T8">1Ch 3:11</text:span></text:p>
            <text:p text:style-name="P10"><text:span text:style-name="T7">Jehoram</text:span></text:p>
            <text:p text:style-name="P10"><text:span text:style-name="T8">1Ki 22:5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7" draw:text-style-name="P11" xml:id="id3" draw:id="id3" draw:layer="layout" svg:width="3.048cm" svg:height="3.81cm" svg:x="38.891cm" svg:y="35.827cm">
            <text:p text:style-name="P9"><text:span text:style-name="T9">Younger</text:span><text:span text:style-name="T7"> Ahaziah</text:span></text:p>
            <text:p text:style-name="P9"><text:span text:style-name="T8">1Ch 3:11</text:span></text:p>
            <text:p text:style-name="P10"><text:span text:style-name="T7">Jehoahaz</text:span></text:p>
            <text:p text:style-name="P10"><text:span text:style-name="T8">2Ch 21:17</text:span></text:p>
            <text:p text:style-name="P10"><text:span text:style-name="T7">Azariah</text:span></text:p>
            <text:p text:style-name="P10"><text:span text:style-name="T8">2Ch 22: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43" draw:id="id43" draw:layer="layout" svg:width="3.048cm" svg:height="2.54cm" svg:x="38.895cm" svg:y="40.256cm">
            <text:p text:style-name="P9"><text:span text:style-name="T7">Joash</text:span></text:p>
            <text:p text:style-name="P9"><text:span text:style-name="T8">1Ch 3:11</text:span></text:p>
            <text:p text:style-name="P9"><text:span text:style-name="T8">2Ki 11:12</text:span></text:p>
            <text:p text:style-name="P10"><text:span text:style-name="T7">Jehoash</text:span></text:p>
            <text:p text:style-name="P10"><text:span text:style-name="T8">2Ki 11: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44" draw:id="id44" draw:layer="layout" svg:width="3.048cm" svg:height="2.54cm" svg:x="38.896cm" svg:y="43.157cm">
            <text:p text:style-name="P9"><text:span text:style-name="T7">Amaziah</text:span></text:p>
            <text:p text:style-name="P9"><text:span text:style-name="T8">1Ch 3:12</text:span></text:p>
            <text:p text:style-name="P9"><text:span text:style-name="T8">2Ki 12:20,21</text:span></text:p>
            <text:p text:style-name="P9"><text:span text:style-name="T8">2Ch 24:2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11" xml:id="id50" draw:id="id50" draw:layer="layout" svg:width="3.048cm" svg:height="3.15cm" svg:x="38.895cm" svg:y="46.135cm">
            <text:p text:style-name="P9"><text:span text:style-name="T7">Azariah</text:span></text:p>
            <text:p text:style-name="P9"><text:span text:style-name="T8">1Ch 3:12</text:span></text:p>
            <text:p text:style-name="P10"><text:span text:style-name="T7">Uzziah</text:span></text:p>
            <text:p text:style-name="P10"><text:span text:style-name="T8">2Ch 26:1</text:span></text:p>
            <text:p text:style-name="P10"><text:span text:style-name="T7">Ozias</text:span></text:p>
            <text:p text:style-name="P10"><text:span text:style-name="T8">Mat 1:8,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51" draw:id="id51" draw:layer="layout" svg:width="3.048cm" svg:height="2.54cm" svg:x="38.896cm" svg:y="49.657cm">
            <text:p text:style-name="P9"><text:span text:style-name="T7">Jotham</text:span></text:p>
            <text:p text:style-name="P9"><text:span text:style-name="T8">1Ch 3:12</text:span></text:p>
            <text:p text:style-name="P10"><text:span text:style-name="T7">Joatham</text:span></text:p>
            <text:p text:style-name="P10"><text:span text:style-name="T8">Mat 1: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52" draw:id="id52" draw:layer="layout" svg:width="3.048cm" svg:height="2.54cm" svg:x="38.896cm" svg:y="52.557cm">
            <text:p text:style-name="P9"><text:span text:style-name="T7">Ahaz</text:span></text:p>
            <text:p text:style-name="P9"><text:span text:style-name="T8">1Ch 3:13</text:span></text:p>
            <text:p text:style-name="P10"><text:span text:style-name="T7">Achaz</text:span></text:p>
            <text:p text:style-name="P10"><text:span text:style-name="T8">Mat 1: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46" draw:id="id46" draw:layer="layout" svg:width="3.048cm" svg:height="2.54cm" svg:x="38.897cm" svg:y="55.458cm">
            <text:p text:style-name="P9"><text:span text:style-name="T7">Hezekiah</text:span></text:p>
            <text:p text:style-name="P9"><text:span text:style-name="T8">1Ch 3:13</text:span></text:p>
            <text:p text:style-name="P10"><text:span text:style-name="T7">Ezekias</text:span></text:p>
            <text:p text:style-name="P10"><text:span text:style-name="T8">Mat 1:9,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45" draw:id="id45" draw:layer="layout" svg:width="3.048cm" svg:height="2.54cm" svg:x="38.898cm" svg:y="58.459cm">
            <text:p text:style-name="P9"><text:span text:style-name="T7">Manasseh</text:span></text:p>
            <text:p text:style-name="P9"><text:span text:style-name="T8">1Ch 3:13</text:span></text:p>
            <text:p text:style-name="P10"><text:span text:style-name="T7">Manasses</text:span></text:p>
            <text:p text:style-name="P10"><text:span text:style-name="T8">Mat 1: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47" draw:id="id47" draw:layer="layout" svg:width="3.048cm" svg:height="2.54cm" svg:x="38.898cm" svg:y="61.459cm">
            <text:p text:style-name="P9"><text:span text:style-name="T7">Amon</text:span></text:p>
            <text:p text:style-name="P9"><text:span text:style-name="T8">1Ch 3:14</text:span></text:p>
            <text:p text:style-name="P9"><text:span text:style-name="T8">2Ki 21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48" draw:id="id48" draw:layer="layout" svg:width="3.048cm" svg:height="2.54cm" svg:x="38.899cm" svg:y="64.56cm">
            <text:p text:style-name="P9"><text:span text:style-name="T7">Josiah</text:span></text:p>
            <text:p text:style-name="P9"><text:span text:style-name="T8">1Ch 3:14</text:span></text:p>
            <text:p text:style-name="P10"><text:span text:style-name="T7">Josias</text:span></text:p>
            <text:p text:style-name="P10"><text:span text:style-name="T8">Mat 1:10,1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2" draw:id="id2" draw:layer="layout" svg:width="3.048cm" svg:height="2.54cm" svg:x="34.4cm" svg:y="70.761cm">
            <text:p text:style-name="P9"><text:span text:style-name="T7">Jehoiakim</text:span></text:p>
            <text:p text:style-name="P9"><text:span text:style-name="T8">1Ch 3:15</text:span></text:p>
            <text:p text:style-name="P10"><text:span text:style-name="T7">Eliakim</text:span></text:p>
            <text:p text:style-name="P10"><text:span text:style-name="T8">2Ki 23:3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49" draw:id="id49" draw:layer="layout" svg:width="3.048cm" svg:height="2.54cm" svg:x="30.401cm" svg:y="70.762cm">
            <text:p text:style-name="P9"><text:span text:style-name="T5">Johanan</text:span></text:p>
            <text:p text:style-name="P9"><text:span text:style-name="T8">1Ch 3:1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53" draw:id="id53" draw:layer="layout" svg:width="3.048cm" svg:height="2.54cm" svg:x="43.602cm" svg:y="70.763cm">
            <text:p text:style-name="P9"><text:span text:style-name="T7">Zedekiah</text:span></text:p>
            <text:p text:style-name="P9"><text:span text:style-name="T8">1Ch 3:15</text:span></text:p>
            <text:p text:style-name="P10"><text:span text:style-name="T7">Mattaniah</text:span></text:p>
            <text:p text:style-name="P10"><text:span text:style-name="T8">2Ki 24: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54" draw:id="id54" draw:layer="layout" svg:width="3.048cm" svg:height="2.54cm" svg:x="47.303cm" svg:y="70.764cm">
            <text:p text:style-name="P9"><text:span text:style-name="T7">Shallum</text:span></text:p>
            <text:p text:style-name="P9"><text:span text:style-name="T8">1Ch 3:15</text:span></text:p>
            <text:p text:style-name="P10"><text:span text:style-name="T7">Jehoahaz</text:span></text:p>
            <text:p text:style-name="P10"><text:span text:style-name="T8">2Ki 23:3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9" draw:text-style-name="P11" xml:id="id55" draw:id="id55" draw:layer="layout" svg:width="3.15cm" svg:height="4.674cm" svg:x="34.353cm" svg:y="74.162cm">
            <text:p text:style-name="P9"><text:span text:style-name="T7">Jeconiah</text:span></text:p>
            <text:p text:style-name="P9"><text:span text:style-name="T8">1Ch 3:16</text:span></text:p>
            <text:p text:style-name="P10"><text:span text:style-name="T7">Elder Jehoiachin</text:span></text:p>
            <text:p text:style-name="P10"><text:span text:style-name="T8">2Ki 24:6</text:span></text:p>
            <text:p text:style-name="P10"><text:span text:style-name="T7">Coniah</text:span></text:p>
            <text:p text:style-name="P10"><text:span text:style-name="T8">Jer 22:24</text:span></text:p>
            <text:p text:style-name="P10"><text:span text:style-name="T7">Jechonias</text:span></text:p>
            <text:p text:style-name="P10"><text:span text:style-name="T8">Mat 1:1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60" draw:id="id60" draw:layer="layout" svg:width="3.048cm" svg:height="2.54cm" svg:x="41.583cm" svg:y="74.5cm">
            <text:p text:style-name="P9"><text:span text:style-name="T7">Zedekiah</text:span></text:p>
            <text:p text:style-name="P9"><text:span text:style-name="T8">1Ch 3: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68" draw:id="id68" draw:layer="layout" svg:width="3.048cm" svg:height="2.54cm" svg:x="36.302cm" svg:y="80.763cm">
            <text:p text:style-name="P9"><text:span text:style-name="T7">Shenazar</text:span></text:p>
            <text:p text:style-name="P9"><text:span text:style-name="T8">1Ch 3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69" draw:id="id69" draw:layer="layout" svg:width="3.048cm" svg:height="2.54cm" svg:x="39.884cm" svg:y="80.765cm">
            <text:p text:style-name="P9"><text:span text:style-name="T7">Jecamiah</text:span></text:p>
            <text:p text:style-name="P9"><text:span text:style-name="T8">1Ch 3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70" draw:id="id70" draw:layer="layout" svg:width="3.048cm" svg:height="2.54cm" svg:x="43.503cm" svg:y="80.764cm">
            <text:p text:style-name="P9"><text:span text:style-name="T7">Hoshama</text:span></text:p>
            <text:p text:style-name="P9"><text:span text:style-name="T8">1Ch 3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71" draw:id="id71" draw:layer="layout" svg:width="3.048cm" svg:height="2.54cm" svg:x="47.085cm" svg:y="80.766cm">
            <text:p text:style-name="P9"><text:span text:style-name="T7">Nedabiah</text:span></text:p>
            <text:p text:style-name="P9"><text:span text:style-name="T8">1Ch 3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56" draw:id="id56" draw:layer="layout" svg:width="3.048cm" svg:height="2.54cm" svg:x="21.803cm" svg:y="80.764cm">
            <text:p text:style-name="P9"><text:span text:style-name="T7">Assir</text:span></text:p>
            <text:p text:style-name="P9"><text:span text:style-name="T8">1Ch 3: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0" draw:text-style-name="P11" xml:id="id61" draw:id="id61" draw:layer="layout" svg:width="3.048cm" svg:height="3.607cm" svg:x="25.385cm" svg:y="80.766cm">
            <text:p text:style-name="P9"><text:span text:style-name="T7">Salathiel</text:span></text:p>
            <text:p text:style-name="P9"><text:span text:style-name="T8">1Ch 3:17</text:span></text:p>
            <text:p text:style-name="P10"><text:span text:style-name="T7">Shealtiel</text:span></text:p>
            <text:p text:style-name="P10"><text:span text:style-name="T8">Ezr 3:2,8</text:span></text:p>
            <text:p text:style-name="P10"><text:span text:style-name="T8">Neh 12:1</text:span></text:p>
            <text:p text:style-name="P10"><text:span text:style-name="T8">Hag 1:1,12,14, 2:2, 2: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62" draw:id="id62" draw:layer="layout" svg:width="3.048cm" svg:height="2.54cm" svg:x="29.004cm" svg:y="80.765cm">
            <text:p text:style-name="P9"><text:span text:style-name="T7">Malchiram</text:span></text:p>
            <text:p text:style-name="P9"><text:span text:style-name="T8">1Ch 3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63" draw:id="id63" draw:layer="layout" svg:width="3.048cm" svg:height="2.54cm" svg:x="32.586cm" svg:y="80.767cm">
            <text:p text:style-name="P9"><text:span text:style-name="T7">Pedaiah</text:span></text:p>
            <text:p text:style-name="P9"><text:span text:style-name="T8">1Ch 3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72" draw:id="id72" draw:layer="layout" svg:width="3.048cm" svg:height="2.54cm" svg:x="32.588cm" svg:y="85.764cm">
            <text:p text:style-name="P9"><text:span text:style-name="T7">Shimei</text:span></text:p>
            <text:p text:style-name="P9"><text:span text:style-name="T8">1Ch 3: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58" draw:id="id58" draw:layer="layout" svg:width="3.048cm" svg:height="2.54cm" svg:x="28.872cm" svg:y="85.768cm">
            <text:p text:style-name="P9"><text:span text:style-name="T7">Zerubbabel</text:span></text:p>
            <text:p text:style-name="P9"><text:span text:style-name="T8">1Ch 3:19</text:span></text:p>
            <text:p text:style-name="P10"><text:span text:style-name="T7">Zorobabel</text:span></text:p>
            <text:p text:style-name="P10"><text:span text:style-name="T8">Mat 1:12</text:span></text:p>
            <text:p text:style-name="P10"><text:span text:style-name="T8">Luk 3:2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59" draw:id="id59" draw:layer="layout" svg:width="3.048cm" svg:height="2.54cm" svg:x="19.589cm" svg:y="91.165cm">
            <text:p text:style-name="P9"><text:span text:style-name="T7">Hananiah</text:span></text:p>
            <text:p text:style-name="P9"><text:span text:style-name="T8">1Ch 3: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57" draw:id="id57" draw:layer="layout" svg:width="3.048cm" svg:height="2.54cm" svg:x="15.873cm" svg:y="91.169cm">
            <text:p text:style-name="P9"><text:span text:style-name="T7">Meshullam</text:span></text:p>
            <text:p text:style-name="P9"><text:span text:style-name="T8">1Ch 3: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16" xml:id="id64" draw:id="id64" draw:layer="layout" svg:width="3.048cm" svg:height="2.54cm" svg:x="23.29cm" svg:y="91.166cm">
            <text:p text:style-name="P9"><text:span text:style-name="T7">Shelomith</text:span></text:p>
            <text:p text:style-name="P9"><text:span text:style-name="T8">1Ch 3: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74" draw:id="id74" draw:layer="layout" svg:width="3.048cm" svg:height="2.54cm" svg:x="30.69cm" svg:y="91.166cm">
            <text:p text:style-name="P9"><text:span text:style-name="T7">Ohel</text:span></text:p>
            <text:p text:style-name="P9"><text:span text:style-name="T8">1Ch 3: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73" draw:id="id73" draw:layer="layout" svg:width="3.048cm" svg:height="2.54cm" svg:x="26.974cm" svg:y="91.17cm">
            <text:p text:style-name="P9"><text:span text:style-name="T7">Hashubah</text:span></text:p>
            <text:p text:style-name="P9"><text:span text:style-name="T8">1Ch 3: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65" draw:id="id65" draw:layer="layout" svg:width="3.048cm" svg:height="2.54cm" svg:x="34.391cm" svg:y="91.167cm">
            <text:p text:style-name="P9"><text:span text:style-name="T7">Berechiah</text:span></text:p>
            <text:p text:style-name="P9"><text:span text:style-name="T8">1Ch 3: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66" draw:id="id66" draw:layer="layout" svg:width="3.048cm" svg:height="2.54cm" svg:x="38.191cm" svg:y="91.167cm">
            <text:p text:style-name="P9"><text:span text:style-name="T7">Hasadiah</text:span></text:p>
            <text:p text:style-name="P9"><text:span text:style-name="T8">1Ch 3: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67" draw:id="id67" draw:layer="layout" svg:width="3.048cm" svg:height="2.54cm" svg:x="41.892cm" svg:y="91.168cm">
            <text:p text:style-name="P9"><text:span text:style-name="T7">Jushab-hesed</text:span></text:p>
            <text:p text:style-name="P9"><text:span text:style-name="T8">1Ch 3: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96" draw:id="id96" draw:layer="layout" svg:width="3.048cm" svg:height="2.54cm" svg:x="34.088cm" svg:y="96.064cm">
            <text:p text:style-name="P9"><text:span text:style-name="T7">Obadiah</text:span></text:p>
            <text:p text:style-name="P9"><text:span text:style-name="T8">1Ch 3: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2" draw:text-style-name="P17" xml:id="id81" draw:id="id81" draw:layer="layout" svg:width="3.2cm" svg:height="2.54cm" svg:x="37.67cm" svg:y="96.066cm">
            <text:p text:style-name="P9"><text:span text:style-name="T7">Shechaniah</text:span></text:p>
            <text:p text:style-name="P9"><text:span text:style-name="T8">1Ch 3:21</text:span></text:p>
            <text:p text:style-name="P9"><text:span text:style-name="T8">Ezr 8:3,5</text:span><text:span text:style-name="T10">*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75" draw:id="id75" draw:layer="layout" svg:width="3.048cm" svg:height="2.54cm" svg:x="19.589cm" svg:y="96.065cm">
            <text:p text:style-name="P9"><text:span text:style-name="T7">Pelatiah</text:span></text:p>
            <text:p text:style-name="P9"><text:span text:style-name="T8">1Ch 3: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85" draw:id="id85" draw:layer="layout" svg:width="3.048cm" svg:height="2.54cm" svg:x="23.171cm" svg:y="96.067cm">
            <text:p text:style-name="P9"><text:span text:style-name="T7">Jesaiah</text:span></text:p>
            <text:p text:style-name="P9"><text:span text:style-name="T8">1Ch 3: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86" draw:id="id86" draw:layer="layout" svg:width="3.048cm" svg:height="2.54cm" svg:x="26.79cm" svg:y="96.066cm">
            <text:p text:style-name="P9"><text:span text:style-name="T7">Rephaiah</text:span></text:p>
            <text:p text:style-name="P9"><text:span text:style-name="T8">1Ch 3: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95" draw:id="id95" draw:layer="layout" svg:width="3.048cm" svg:height="2.54cm" svg:x="30.372cm" svg:y="96.068cm">
            <text:p text:style-name="P9"><text:span text:style-name="T7">Arnan</text:span></text:p>
            <text:p text:style-name="P9"><text:span text:style-name="T8">1Ch 3: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77" draw:id="id77" draw:layer="layout" svg:width="3.048cm" svg:height="2.54cm" svg:x="37.75cm" svg:y="99.169cm">
            <text:p text:style-name="P9"><text:span text:style-name="T7">Shemaiah</text:span></text:p>
            <text:p text:style-name="P9"><text:span text:style-name="T8">1Ch 3:22</text:span></text:p>
            <text:p text:style-name="P9"><text:span text:style-name="T8">Neh 3:29</text:span><text:span text:style-name="T10">*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83" draw:id="id83" draw:layer="layout" svg:width="3.048cm" svg:height="2.54cm" svg:x="45.048cm" svg:y="103.265cm">
            <text:p text:style-name="P9"><text:span text:style-name="T7">Shaphat</text:span></text:p>
            <text:p text:style-name="P9"><text:span text:style-name="T8">1Ch 3: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78" draw:id="id78" draw:layer="layout" svg:width="3.048cm" svg:height="2.54cm" svg:x="30.549cm" svg:y="103.266cm">
            <text:p text:style-name="P9"><text:span text:style-name="T7">Hattush</text:span></text:p>
            <text:p text:style-name="P9"><text:span text:style-name="T8">1Ch 3:22</text:span></text:p>
            <text:p text:style-name="P9"><text:span text:style-name="T8">Ezr 8:2</text:span><text:span text:style-name="T10">*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82" draw:id="id82" draw:layer="layout" svg:width="3.048cm" svg:height="2.54cm" svg:x="34.131cm" svg:y="103.268cm">
            <text:p text:style-name="P9"><text:span text:style-name="T7">Igeal</text:span></text:p>
            <text:p text:style-name="P9"><text:span text:style-name="T8">1Ch 3: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76" draw:id="id76" draw:layer="layout" svg:width="3.048cm" svg:height="2.54cm" svg:x="37.75cm" svg:y="103.267cm">
            <text:p text:style-name="P9"><text:span text:style-name="T7">Bariah</text:span></text:p>
            <text:p text:style-name="P9"><text:span text:style-name="T8">1Ch 3: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80" draw:id="id80" draw:layer="layout" svg:width="3.048cm" svg:height="2.54cm" svg:x="41.332cm" svg:y="103.269cm">
            <text:p text:style-name="P9"><text:span text:style-name="T7">Neariah</text:span></text:p>
            <text:p text:style-name="P9"><text:span text:style-name="T8">1Ch 3: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84" draw:id="id84" draw:layer="layout" svg:width="3.048cm" svg:height="2.54cm" svg:x="45.057cm" svg:y="107.466cm">
            <text:p text:style-name="P9"><text:span text:style-name="T7">Azrikam</text:span></text:p>
            <text:p text:style-name="P9"><text:span text:style-name="T8">1Ch 3: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79" draw:id="id79" draw:layer="layout" svg:width="3.048cm" svg:height="2.54cm" svg:x="37.759cm" svg:y="107.468cm">
            <text:p text:style-name="P9"><text:span text:style-name="T7">Elioenai</text:span></text:p>
            <text:p text:style-name="P9"><text:span text:style-name="T8">1Ch 3: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88" draw:id="id88" draw:layer="layout" svg:width="3.048cm" svg:height="2.54cm" svg:x="41.341cm" svg:y="107.47cm">
            <text:p text:style-name="P9"><text:span text:style-name="T7">Hezekiah</text:span></text:p>
            <text:p text:style-name="P9"><text:span text:style-name="T8">1Ch 3: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93" draw:id="id93" draw:layer="layout" svg:width="3.048cm" svg:height="2.54cm" svg:x="41.483cm" svg:y="111.966cm">
            <text:p text:style-name="P9"><text:span text:style-name="T7">Johanan</text:span></text:p>
            <text:p text:style-name="P9"><text:span text:style-name="T8">1Ch 3: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89" draw:id="id89" draw:layer="layout" svg:width="3.048cm" svg:height="2.54cm" svg:x="26.984cm" svg:y="111.967cm">
            <text:p text:style-name="P9"><text:span text:style-name="T7">Hodaiah</text:span></text:p>
            <text:p text:style-name="P9"><text:span text:style-name="T8">1Ch 3: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90" draw:id="id90" draw:layer="layout" svg:width="3.048cm" svg:height="2.54cm" svg:x="30.566cm" svg:y="111.969cm">
            <text:p text:style-name="P9"><text:span text:style-name="T7">Eliashib</text:span></text:p>
            <text:p text:style-name="P9"><text:span text:style-name="T8">1Ch 3: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91" draw:id="id91" draw:layer="layout" svg:width="3.048cm" svg:height="2.54cm" svg:x="34.185cm" svg:y="111.968cm">
            <text:p text:style-name="P9"><text:span text:style-name="T7">Pelaiah</text:span></text:p>
            <text:p text:style-name="P9"><text:span text:style-name="T8">1Ch 3: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92" draw:id="id92" draw:layer="layout" svg:width="3.048cm" svg:height="2.54cm" svg:x="37.767cm" svg:y="111.97cm">
            <text:p text:style-name="P9"><text:span text:style-name="T7">Akkub</text:span></text:p>
            <text:p text:style-name="P9"><text:span text:style-name="T8">1Ch 3: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87" draw:id="id87" draw:layer="layout" svg:width="3.048cm" svg:height="2.54cm" svg:x="48.884cm" svg:y="111.967cm">
            <text:p text:style-name="P9"><text:span text:style-name="T7">Anani</text:span></text:p>
            <text:p text:style-name="P9"><text:span text:style-name="T8">1Ch 3: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94" draw:id="id94" draw:layer="layout" svg:width="3.048cm" svg:height="2.54cm" svg:x="45.168cm" svg:y="111.971cm">
            <text:p text:style-name="P9"><text:span text:style-name="T7">Dalaiah</text:span></text:p>
            <text:p text:style-name="P9"><text:span text:style-name="T8">1Ch 3: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19" draw:layer="layout" svg:width="19.397cm" svg:height="2.886cm" svg:x="12.7cm" svg:y="85.618cm">
            <text:p text:style-name="P18"><text:span text:style-name="T1">Governor of Judah after Babylonian captivity.</text:span></text:p>
            <text:p text:style-name="P18"><text:span text:style-name="T11">Mat 1:12</text:span><text:span text:style-name="T12"> &amp; </text:span><text:span text:style-name="T11">Luke 3:27</text:span><text:span text:style-name="T12"> list Zorobabel as the son of Salathiel.</text:span></text:p>
            <text:p text:style-name="P18"><text:span text:style-name="T11">1Ch 3:17-19</text:span><text:span text:style-name="T12"> lists Zerubbabel as the son of Pedaiah (sibling of Salathiel).</text:span></text:p>
            <text:p text:style-name="P18"><text:span text:style-name="T12">We cannot prove with scripture what happened, but the most likely scenario appears</text:span></text:p>
            <text:p text:style-name="P18"><text:span text:style-name="T12">to be that Pedaiah raised a son in the name of his brother Salathiel (</text:span><text:span text:style-name="T11">Deu 25:5</text:span><text:span text:style-name="T12">)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4" draw:text-style-name="P21" draw:layer="layout" svg:width="10.478cm" svg:height="2.981cm" svg:x="47.107cm" svg:y="70.563cm">
            <text:p text:style-name="P20"><text:span text:style-name="T12">First among his siblings to be king of</text:span></text:p>
            <text:p text:style-name="P20"><text:span text:style-name="T12">Judah. Reigned for 3 months in</text:span></text:p>
            <text:p text:style-name="P20"><text:span text:style-name="T12">Jerusalem before being taken to Egypt.</text:span></text:p>
            <text:p text:style-name="P20"><text:span text:style-name="T11">2Ch 36:2</text:span></text:p>
            <text:p text:style-name="P20"><text:span text:style-name="T12"/></text:p>
            <text:p text:style-name="P20"><text:span text:style-name="T12">Not listed in Matthew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5" draw:text-style-name="P23" draw:layer="layout" svg:width="3.369cm" svg:height="10.566cm" svg:x="43.412cm" svg:y="62.927cm">
            <text:p text:style-name="P22"><text:span text:style-name="T12">Made the last king over Judah among his siblings by Nebuchadnezzar king of Babylon. Succeeded by the ruler/governor Gedaliah.</text:span></text:p>
            <text:p text:style-name="P22"><text:span text:style-name="T11">2Ch 36:10</text:span></text:p>
            <text:p text:style-name="P22"><text:span text:style-name="T11">2Ki 25: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6" draw:text-style-name="P23" draw:layer="layout" svg:width="3.369cm" svg:height="11.529cm" svg:x="34.24cm" svg:y="61.947cm">
            <text:p text:style-name="P22"><text:span text:style-name="T12">Made second king of Judah among his siblings by Pharaoh-nechoh king of Egypt. Carried to Babylon after reigning 11yrs in Jerusalem.</text:span></text:p>
            <text:p text:style-name="P22"><text:span text:style-name="T11">2Ch 36:4-6</text:span></text:p>
            <text:p text:style-name="P22"><text:span text:style-name="T12"/></text:p>
            <text:p text:style-name="P22"><text:span text:style-name="T12">Not listed in Matthew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7" draw:text-style-name="P25" draw:layer="layout" svg:width="12.07cm" svg:height="5.059cm" svg:x="25.644cm" svg:y="73.941cm">
            <text:p text:style-name="P24"><text:span text:style-name="T12">Last king of Judah by succession.</text:span></text:p>
            <text:p text:style-name="P24"><text:span text:style-name="T12">Carried away to Babylon after reigning 3</text:span></text:p>
            <text:p text:style-name="P24"><text:span text:style-name="T12">months and 10 days in Jerusalem and replaced</text:span></text:p>
            <text:p text:style-name="P24"><text:span text:style-name="T12">by his uncle Mattaniah/Zedekiah at the hand of</text:span></text:p>
            <text:p text:style-name="P24"><text:span text:style-name="T12">Nebuchadnezzar the king of Babylon.</text:span></text:p>
            <text:p text:style-name="P24"><text:span text:style-name="T11">2Ch 36: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8" draw:text-style-name="P13" draw:layer="layout" svg:width="10.466cm" svg:height="10.457cm" svg:x="35.952cm" svg:y="35.503cm">
            <text:p text:style-name="P12"><text:span text:style-name="T1">Not listed in</text:span></text:p>
            <text:p text:style-name="P12"><text:span text:style-name="T1">Matthew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9" draw:text-style-name="P8" xml:id="id39" draw:id="id39" draw:layer="layout" svg:width="3.048cm" svg:height="2.642cm" svg:x="12.776cm" svg:y="21.683cm">
            <text:p text:style-name="P6"><text:span text:style-name="T3">Maachah</text:span></text:p>
            <text:p text:style-name="P6"><text:span text:style-name="T4">2Ch 11:20</text:span></text:p>
            <text:p text:style-name="P6"><text:span text:style-name="T4">1Ki 15:13</text:span></text:p>
            <text:p text:style-name="P14"><text:span text:style-name="T3">Michaiah</text:span></text:p>
            <text:p text:style-name="P14"><text:span text:style-name="T4">2Ch 13: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97" draw:id="id97" draw:layer="layout" svg:width="3.048cm" svg:height="2.54cm" svg:x="12.772cm" svg:y="18.484cm">
            <text:p text:style-name="P6"><text:span text:style-name="T3">Uriel</text:span><text:span text:style-name="T13"> of Gibeah</text:span></text:p>
            <text:p text:style-name="P6"><text:span text:style-name="T6">2Ch 13: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0" draw:text-style-name="P21" draw:layer="layout" svg:width="13.786cm" svg:height="2.771cm" svg:x="12.641cm" svg:y="18.399cm">
            <text:p text:style-name="P20"><text:span text:style-name="T12">Since Maachah/Michaian is both the daughter of</text:span></text:p>
            <text:p text:style-name="P20"><text:span text:style-name="T12">Absalom/Abishalom and Uriel of Gibeah and we find no</text:span></text:p>
            <text:p text:style-name="P20"><text:span text:style-name="T12">Uriel in Absalom’s ancestory, we can only conclude that</text:span></text:p>
            <text:p text:style-name="P20"><text:span text:style-name="T12">Uriel is Maachah/Michaiah’s mother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7" draw:id="id17" draw:layer="layout" svg:width="3.048cm" svg:height="2.54cm" svg:x="82.197cm" svg:y="15.116cm">
            <text:p text:style-name="P9"><text:span text:style-name="T7">Jerimoth</text:span></text:p>
            <text:p text:style-name="P9"><text:span text:style-name="T8">2Ch 11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4" draw:text-style-name="P15" xml:id="id98" draw:id="id98" draw:layer="layout" svg:width="3.048cm" svg:height="2.54cm" svg:x="82.2cm" svg:y="19.019cm">
            <text:p text:style-name="P9"><text:span text:style-name="T7">Mahalath</text:span></text:p>
            <text:p text:style-name="P9"><text:span text:style-name="T8">2Ch 11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1" draw:text-style-name="P25" draw:layer="layout" svg:width="11.43cm" svg:height="2.858cm" svg:x="22.385cm" svg:y="103.106cm">
            <text:p text:style-name="P24"><text:span text:style-name="T12">Probably not the same Hattush as in</text:span></text:p>
            <text:p text:style-name="P24"><text:span text:style-name="T11">Neh 3:10, 10:4, 12:2</text:span><text:span text:style-name="T12"> which is a descendant</text:span></text:p>
            <text:p text:style-name="P24"><text:span text:style-name="T12">of a Levite and listed among the priests twice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2" draw:text-style-name="P25" draw:layer="layout" svg:width="3.296cm" svg:height="6.774cm" svg:x="34.07cm" svg:y="111.875cm">
            <text:p text:style-name="P24"><text:span text:style-name="T12">Could be the same Pelaiah as </text:span><text:span text:style-name="T11">Neh 8:7</text:span><text:span text:style-name="T12"> but probably not </text:span><text:span text:style-name="T11">Neh 10:10</text:span><text:span text:style-name="T12"> (a Levite)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3" draw:text-style-name="P25" draw:layer="layout" svg:width="3.296cm" svg:height="10.01cm" svg:x="37.671cm" svg:y="111.876cm">
            <text:p text:style-name="P24"><text:span text:style-name="T12">Could be the same man as either or both of the following:</text:span></text:p>
            <text:p text:style-name="P24"><text:span text:style-name="T12"/></text:p>
            <text:p text:style-name="P24"><text:span text:style-name="T12">Listed among the porters: </text:span><text:span text:style-name="T11">1Ch 9:17, Ezr 2:42, Neh 11:19, 12:25</text:span><text:span text:style-name="T12">.</text:span></text:p>
            <text:p text:style-name="P24"><text:span text:style-name="T12"/></text:p>
            <text:p text:style-name="P24"><text:span text:style-name="T12">Listed among the Nethinims (servants of the Levites </text:span><text:span text:style-name="T11">Ezr 8:20</text:span><text:span text:style-name="T12">): </text:span><text:span text:style-name="T11">Ezr 2:4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4" draw:text-style-name="P21" draw:layer="layout" svg:width="10.62cm" svg:height="2.807cm" svg:x="12.632cm" svg:y="2.574cm">
            <text:p text:style-name="P20"><text:span text:style-name="T12">Geshur/Geshuri</text:span></text:p>
            <text:p text:style-name="P20"><text:span text:style-name="T12">A region (</text:span><text:span text:style-name="T11">Jos 13:2</text:span><text:span text:style-name="T12">) east of the sea of</text:span></text:p>
            <text:p text:style-name="P20"><text:span text:style-name="T12">Galilee, north of Heshbon (</text:span><text:span text:style-name="T11">Jos 12:5</text:span><text:span text:style-name="T12">) and</text:span></text:p>
            <text:p text:style-name="P20"><text:span text:style-name="T12">a city (</text:span><text:span text:style-name="T11">2Sa 15:8, 1Ch 2:23</text:span><text:span text:style-name="T12">) ruled by Syrians</text:span></text:p>
            <text:p text:style-name="P20"><text:span text:style-name="T12">in the territory given to East Manasseh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35" xml:id="id19" draw:id="id19" draw:layer="layout" svg:width="9.857cm" svg:height="10.877cm" svg:x="50.6cm" svg:y="21.607cm">
            <table:table table:template-name="default" table:use-first-row-styles="true" table:use-banding-rows-styles="true" table:use-banding-columns-styles="true">
              <table:table-column table:style-name="co1"/>
              <table:table-column table:style-name="co2"/>
              <table:table-column table:style-name="co1"/>
              <table:table-column table:style-name="co3"/>
              <table:table-column table:style-name="co4"/>
              <table:table-row table:style-name="ro1" table:default-cell-style-name="ce2">
                <table:table-cell table:style-name="ce1">
                  <text:p text:style-name="P26"><text:span text:style-name="T14">2Sa</text:span></text:p>
                </table:table-cell>
                <table:table-cell/>
                <table:table-cell>
                  <text:p text:style-name="P26"><text:span text:style-name="T14">1Ch 3</text:span></text:p>
                </table:table-cell>
                <table:table-cell/>
                <table:table-cell table:style-name="ce3">
                  <text:p text:style-name="P26"><text:span text:style-name="T14">1Ch 14</text:span></text:p>
                </table:table-cell>
              </table:table-row>
              <table:table-row table:style-name="ro1" table:default-cell-style-name="ce5">
                <table:table-cell table:style-name="ce4">
                  <text:p text:style-name="P27"><text:span text:style-name="T15">Shammua</text:span></text:p>
                </table:table-cell>
                <table:table-cell/>
                <table:table-cell table:style-name="ce6">
                  <text:p text:style-name="P28"><text:span text:style-name="T16">Shimea</text:span></text:p>
                </table:table-cell>
                <table:table-cell/>
                <table:table-cell table:style-name="ce7">
                  <text:p text:style-name="P27"><text:span text:style-name="T15">Shammua</text:span></text:p>
                </table:table-cell>
              </table:table-row>
              <table:table-row table:style-name="ro1" table:default-cell-style-name="ce5">
                <table:table-cell table:style-name="ce4">
                  <text:p text:style-name="P27"><text:span text:style-name="T15">Shobab</text:span></text:p>
                </table:table-cell>
                <table:table-cell/>
                <table:table-cell>
                  <text:p text:style-name="P27"><text:span text:style-name="T15">Shobab</text:span></text:p>
                </table:table-cell>
                <table:table-cell/>
                <table:table-cell table:style-name="ce7">
                  <text:p text:style-name="P27"><text:span text:style-name="T15">Shobab</text:span></text:p>
                </table:table-cell>
              </table:table-row>
              <table:table-row table:style-name="ro1" table:default-cell-style-name="ce5">
                <table:table-cell table:style-name="ce4">
                  <text:p text:style-name="P27"><text:span text:style-name="T15">Nathan</text:span></text:p>
                </table:table-cell>
                <table:table-cell/>
                <table:table-cell>
                  <text:p text:style-name="P27"><text:span text:style-name="T15">Nathan</text:span></text:p>
                </table:table-cell>
                <table:table-cell/>
                <table:table-cell table:style-name="ce7">
                  <text:p text:style-name="P27"><text:span text:style-name="T15">Nathan</text:span></text:p>
                </table:table-cell>
              </table:table-row>
              <table:table-row table:style-name="ro1" table:default-cell-style-name="ce5">
                <table:table-cell table:style-name="ce4">
                  <text:p text:style-name="P27"><text:span text:style-name="T15">Solomon</text:span></text:p>
                </table:table-cell>
                <table:table-cell/>
                <table:table-cell>
                  <text:p text:style-name="P27"><text:span text:style-name="T15">Solomon</text:span></text:p>
                </table:table-cell>
                <table:table-cell/>
                <table:table-cell table:style-name="ce7">
                  <text:p text:style-name="P27"><text:span text:style-name="T15">Solomon</text:span></text:p>
                </table:table-cell>
              </table:table-row>
              <table:table-row table:style-name="ro1" table:default-cell-style-name="ce5">
                <table:table-cell table:style-name="ce4">
                  <text:p text:style-name="P27"><text:span text:style-name="T15">Ibhar</text:span></text:p>
                </table:table-cell>
                <table:table-cell/>
                <table:table-cell>
                  <text:p text:style-name="P27"><text:span text:style-name="T15">Ibhar</text:span></text:p>
                </table:table-cell>
                <table:table-cell/>
                <table:table-cell table:style-name="ce7">
                  <text:p text:style-name="P27"><text:span text:style-name="T15">Ibhar</text:span></text:p>
                </table:table-cell>
              </table:table-row>
              <table:table-row table:style-name="ro1" table:default-cell-style-name="ce5">
                <table:table-cell table:style-name="ce4">
                  <text:p text:style-name="P27"><text:span text:style-name="T15">Elishua</text:span></text:p>
                </table:table-cell>
                <table:table-cell/>
                <table:table-cell table:style-name="ce6">
                  <text:p text:style-name="P28"><text:span text:style-name="T16">Elishama</text:span></text:p>
                </table:table-cell>
                <table:table-cell/>
                <table:table-cell table:style-name="ce7">
                  <text:p text:style-name="P27"><text:span text:style-name="T15">Elishua</text:span></text:p>
                </table:table-cell>
              </table:table-row>
              <table:table-row table:style-name="ro1" table:default-cell-style-name="ce5">
                <table:table-cell table:style-name="ce4"/>
                <table:table-cell/>
                <table:table-cell>
                  <text:p text:style-name="P27"><text:span text:style-name="T15">Eliphelet</text:span></text:p>
                </table:table-cell>
                <table:table-cell/>
                <table:table-cell table:style-name="ce8">
                  <text:p text:style-name="P28"><text:span text:style-name="T16">Elpalet</text:span></text:p>
                </table:table-cell>
              </table:table-row>
              <table:table-row table:style-name="ro1" table:default-cell-style-name="ce5">
                <table:table-cell table:style-name="ce4"/>
                <table:table-cell/>
                <table:table-cell>
                  <text:p text:style-name="P27"><text:span text:style-name="T15">Nogah</text:span></text:p>
                </table:table-cell>
                <table:table-cell/>
                <table:table-cell table:style-name="ce7">
                  <text:p text:style-name="P27"><text:span text:style-name="T15">Nogah</text:span></text:p>
                </table:table-cell>
              </table:table-row>
              <table:table-row table:style-name="ro1" table:default-cell-style-name="ce5">
                <table:table-cell table:style-name="ce4"/>
                <table:table-cell/>
                <table:table-cell>
                  <text:p text:style-name="P27"><text:span text:style-name="T15">Nepheg</text:span></text:p>
                </table:table-cell>
                <table:table-cell/>
                <table:table-cell table:style-name="ce7">
                  <text:p text:style-name="P27"><text:span text:style-name="T15">Nepheg</text:span></text:p>
                </table:table-cell>
              </table:table-row>
              <table:table-row table:style-name="ro1" table:default-cell-style-name="ce5">
                <table:table-cell table:style-name="ce4">
                  <text:p text:style-name="P27"><text:span text:style-name="T15">Japhia</text:span></text:p>
                </table:table-cell>
                <table:table-cell/>
                <table:table-cell>
                  <text:p text:style-name="P27"><text:span text:style-name="T15">Japhia</text:span></text:p>
                </table:table-cell>
                <table:table-cell/>
                <table:table-cell table:style-name="ce7">
                  <text:p text:style-name="P27"><text:span text:style-name="T15">Japhia</text:span></text:p>
                </table:table-cell>
              </table:table-row>
              <table:table-row table:style-name="ro1" table:default-cell-style-name="ce5">
                <table:table-cell table:style-name="ce4">
                  <text:p text:style-name="P27"><text:span text:style-name="T15">Elishama</text:span></text:p>
                </table:table-cell>
                <table:table-cell/>
                <table:table-cell>
                  <text:p text:style-name="P27"><text:span text:style-name="T15">Elishama</text:span></text:p>
                </table:table-cell>
                <table:table-cell/>
                <table:table-cell table:style-name="ce7">
                  <text:p text:style-name="P27"><text:span text:style-name="T15">Elishama</text:span></text:p>
                </table:table-cell>
              </table:table-row>
              <table:table-row table:style-name="ro1" table:default-cell-style-name="ce5">
                <table:table-cell table:style-name="ce4">
                  <text:p text:style-name="P27"><text:span text:style-name="T15">Eliada</text:span></text:p>
                </table:table-cell>
                <table:table-cell/>
                <table:table-cell>
                  <text:p text:style-name="P27"><text:span text:style-name="T15">Eliada</text:span></text:p>
                </table:table-cell>
                <table:table-cell/>
                <table:table-cell table:style-name="ce8">
                  <text:p text:style-name="P28"><text:span text:style-name="T16">Beeliada</text:span></text:p>
                </table:table-cell>
              </table:table-row>
              <table:table-row table:style-name="ro1" table:default-cell-style-name="ce10">
                <table:table-cell table:style-name="ce9">
                  <text:p text:style-name="P27"><text:span text:style-name="T15">Eliphalet</text:span></text:p>
                </table:table-cell>
                <table:table-cell/>
                <table:table-cell table:style-name="ce11">
                  <text:p text:style-name="P28"><text:span text:style-name="T16">Eliphelet</text:span></text:p>
                </table:table-cell>
                <table:table-cell/>
                <table:table-cell table:style-name="ce12">
                  <text:p text:style-name="P27"><text:span text:style-name="T15">Eliphalet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36" draw:text-style-name="P29" draw:layer="layout" svg:width="19.346cm" svg:height="8.506cm" svg:x="47.22cm" svg:y="49.705cm">
            <draw:text-box>
              <text:p><text:span text:style-name="T17">1 </text:span><text:span text:style-name="T18">Chronicles</text:span><text:span text:style-name="T17"> 3</text:span></text:p>
            </draw:text-box>
          </draw:frame>
          <draw:custom-shape draw:style-name="gr37" draw:text-style-name="P11" xml:id="id5" draw:id="id5" draw:layer="layout" svg:width="3.048cm" svg:height="3.099cm" svg:x="42.695cm" svg:y="36.119cm">
            <text:p text:style-name="P9"><text:span text:style-name="T9">Elder</text:span><text:span text:style-name="T7"> Ahaziah</text:span></text:p>
            <text:p text:style-name="P9"><text:span text:style-name="T19">2Ch 22:2-5,9</text:span></text:p>
            <text:p text:style-name="P9"><text:span text:style-name="T19">2Ki 9:2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" draw:id="id1" draw:layer="layout" svg:width="3.048cm" svg:height="2.54cm" svg:x="38.084cm" svg:y="74.501cm">
            <text:p text:style-name="P9"><text:span text:style-name="T7">Younger Jehoiachin</text:span></text:p>
            <text:p text:style-name="P9"><text:span text:style-name="T19">2Ki 24:12</text:span></text:p>
            <text:p text:style-name="P9"><text:span text:style-name="T19">2Ch 36:9,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8" draw:text-style-name="P23" draw:layer="layout" svg:width="3.369cm" svg:height="4.674cm" svg:x="37.926cm" svg:y="74.326cm">
            <text:p text:style-name="P22"><text:span text:style-name="T12">Not listed in Matthew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</draw:page>
      <draw:page draw:name="page2" draw:style-name="dp2" draw:master-page-name="Default">
        <draw:g draw:style-name="gr1">
          <draw:connector draw:style-name="gr2" draw:text-style-name="P1" draw:layer="layout" draw:type="curve" svg:x1="39.608cm" svg:y1="74.501cm" svg:x2="35.924cm" svg:y2="73.301cm" draw:start-shape="id99" draw:start-glue-point="0" draw:end-shape="id100" svg:d="M39608 74501c0-859-3684-260-3684-1200" svg:viewBox="0 0 3685 1201">
            <text:p/>
          </draw:connector>
          <draw:connector draw:style-name="gr3" draw:text-style-name="P1" draw:layer="layout" draw:type="curve" svg:x1="40.415cm" svg:y1="35.827cm" svg:x2="40.418cm" svg:y2="34.995cm" draw:start-shape="id101" draw:start-glue-point="0" draw:end-shape="id102" draw:end-glue-point="2" svg:d="M40415 35827c0-622 3-207 3-832" svg:viewBox="0 0 4 833">
            <text:p/>
          </draw:connector>
          <draw:connector draw:style-name="gr3" draw:text-style-name="P1" draw:layer="layout" draw:type="curve" svg:x1="40.418cm" svg:y1="34.995cm" svg:x2="44.219cm" svg:y2="36.119cm" draw:start-shape="id102" draw:start-glue-point="2" draw:end-shape="id103" draw:end-glue-point="0" svg:d="M40418 34995c0 843 3801 281 3801 1124" svg:viewBox="0 0 3802 1125">
            <text:p/>
          </draw:connector>
          <draw:connector draw:style-name="gr3" draw:text-style-name="P1" draw:layer="layout" draw:type="curve" svg:x1="79.923cm" svg:y1="15.118cm" svg:x2="40.35cm" svg:y2="5.211cm" draw:start-shape="id104" draw:start-glue-point="0" draw:end-shape="id105" draw:end-glue-point="2" svg:d="M79923 15118c0-7390-39573-2437-39573-9907" svg:viewBox="0 0 39574 9908">
            <text:p/>
          </draw:connector>
          <draw:connector draw:style-name="gr3" draw:text-style-name="P1" draw:layer="layout" draw:type="curve" svg:x1="44.618cm" svg:y1="15.113cm" svg:x2="40.35cm" svg:y2="5.211cm" draw:start-shape="id106" draw:start-glue-point="0" draw:end-shape="id105" draw:end-glue-point="2" svg:d="M44618 15113c0-7386-4268-2435-4268-9902" svg:viewBox="0 0 4269 9903">
            <text:p/>
          </draw:connector>
          <draw:connector draw:style-name="gr3" draw:text-style-name="P1" draw:layer="layout" draw:type="curve" svg:x1="48.219cm" svg:y1="15.114cm" svg:x2="40.35cm" svg:y2="5.211cm" draw:start-shape="id107" draw:start-glue-point="0" draw:end-shape="id105" draw:end-glue-point="2" svg:d="M48219 15114c0-7387-7869-2436-7869-9903" svg:viewBox="0 0 7870 9904">
            <text:p/>
          </draw:connector>
          <draw:connector draw:style-name="gr3" draw:text-style-name="P1" draw:layer="layout" draw:type="curve" svg:x1="51.819cm" svg:y1="15.114cm" svg:x2="40.35cm" svg:y2="5.211cm" draw:start-shape="id108" draw:start-glue-point="0" draw:end-shape="id105" draw:end-glue-point="2" svg:d="M51819 15114c0-7387-11469-2436-11469-9903" svg:viewBox="0 0 11470 9904">
            <text:p/>
          </draw:connector>
          <draw:connector draw:style-name="gr3" draw:text-style-name="P1" draw:layer="layout" draw:type="curve" svg:x1="55.52cm" svg:y1="15.115cm" svg:x2="40.35cm" svg:y2="5.211cm" draw:start-shape="id109" draw:start-glue-point="0" draw:end-shape="id105" draw:end-glue-point="2" svg:d="M55520 15115c0-7387-15170-2436-15170-9904" svg:viewBox="0 0 15171 9905">
            <text:p/>
          </draw:connector>
          <draw:connector draw:style-name="gr3" draw:text-style-name="P1" draw:layer="layout" draw:type="curve" svg:x1="59.219cm" svg:y1="15.114cm" svg:x2="40.35cm" svg:y2="5.211cm" draw:start-shape="id110" draw:start-glue-point="0" draw:end-shape="id105" draw:end-glue-point="2" svg:d="M59219 15114c0-7387-18869-2436-18869-9903" svg:viewBox="0 0 18870 9904">
            <text:p/>
          </draw:connector>
          <draw:connector draw:style-name="gr3" draw:text-style-name="P1" draw:layer="layout" draw:type="curve" svg:x1="62.92cm" svg:y1="15.115cm" svg:x2="40.35cm" svg:y2="5.211cm" draw:start-shape="id111" draw:start-glue-point="0" draw:end-shape="id105" draw:end-glue-point="2" svg:d="M62920 15115c0-7387-22570-2436-22570-9904" svg:viewBox="0 0 22571 9905">
            <text:p/>
          </draw:connector>
          <draw:connector draw:style-name="gr3" draw:text-style-name="P1" draw:layer="layout" draw:type="curve" svg:x1="66.62cm" svg:y1="15.115cm" svg:x2="40.35cm" svg:y2="5.211cm" draw:start-shape="id112" draw:start-glue-point="0" draw:end-shape="id105" draw:end-glue-point="2" svg:d="M66620 15115c0-7387-26270-2436-26270-9904" svg:viewBox="0 0 26271 9905">
            <text:p/>
          </draw:connector>
          <draw:connector draw:style-name="gr3" draw:text-style-name="P1" draw:layer="layout" draw:type="curve" svg:x1="70.321cm" svg:y1="15.116cm" svg:x2="40.35cm" svg:y2="5.211cm" draw:start-shape="id113" draw:start-glue-point="0" draw:end-shape="id105" draw:end-glue-point="2" svg:d="M70321 15116c0-7389-29971-2437-29971-9905" svg:viewBox="0 0 29972 9906">
            <text:p/>
          </draw:connector>
          <draw:connector draw:style-name="gr3" draw:text-style-name="P1" draw:layer="layout" draw:type="curve" svg:x1="74.022cm" svg:y1="15.117cm" svg:x2="40.35cm" svg:y2="5.211cm" draw:start-shape="id114" draw:start-glue-point="0" draw:end-shape="id105" draw:end-glue-point="2" svg:d="M74022 15117c0-7389-33672-2436-33672-9906" svg:viewBox="0 0 33673 9907">
            <text:p/>
          </draw:connector>
          <draw:connector draw:style-name="gr3" draw:text-style-name="P1" draw:layer="layout" draw:type="curve" svg:x1="83.721cm" svg:y1="15.116cm" svg:x2="40.35cm" svg:y2="5.211cm" draw:start-shape="id115" draw:start-glue-point="0" draw:end-shape="id105" draw:end-glue-point="2" svg:d="M83721 15116c0-7389-43371-2437-43371-9905" svg:viewBox="0 0 43372 9906">
            <text:p/>
          </draw:connector>
          <draw:connector draw:style-name="gr4" draw:text-style-name="P1" draw:layer="layout" draw:type="curve" svg:x1="55.522cm" svg:y1="19.615cm" svg:x2="55.528cm" svg:y2="21.607cm" draw:start-shape="id116" draw:start-glue-point="2" draw:end-shape="id117" draw:end-glue-point="0" svg:d="M55522 19615c0 1474 6 479 6 1992" svg:viewBox="0 0 7 1993">
            <text:p/>
          </draw:connector>
          <draw:connector draw:style-name="gr2" draw:text-style-name="P1" draw:layer="layout" draw:type="curve" svg:x1="14.298cm" svg:y1="10.61cm" svg:x2="14.32cm" svg:y2="5.211cm" draw:start-shape="id118" draw:start-glue-point="0" draw:end-shape="id119" draw:end-glue-point="2" svg:d="M14298 10610c0-4048 22-1349 22-5399" svg:viewBox="0 0 23 5400">
            <text:p/>
          </draw:connector>
          <draw:connector draw:style-name="gr3" draw:text-style-name="P1" draw:layer="layout" draw:type="curve" svg:x1="7.182cm" svg:y1="13.149cm" svg:x2="7.182cm" svg:y2="15.154cm" draw:start-shape="id120" draw:start-glue-point="2" draw:end-shape="id121" draw:end-glue-point="0" svg:d="M7182 13149v2005" svg:viewBox="0 0 1 2006">
            <text:p/>
          </draw:connector>
          <draw:connector draw:style-name="gr3" draw:text-style-name="P1" draw:layer="layout" draw:type="curve" svg:x1="10.694cm" svg:y1="15.171cm" svg:x2="10.697cm" svg:y2="13.149cm" draw:start-shape="id122" draw:start-glue-point="0" draw:end-shape="id123" draw:end-glue-point="2" svg:d="M10694 15171c0-1515 3-504 3-2022" svg:viewBox="0 0 4 2023">
            <text:p/>
          </draw:connector>
          <draw:connector draw:style-name="gr3" draw:text-style-name="P1" draw:layer="layout" draw:type="curve" svg:x1="14.3cm" svg:y1="15.172cm" svg:x2="14.298cm" svg:y2="13.15cm" draw:start-shape="id124" draw:start-glue-point="0" draw:end-shape="id118" svg:d="M14300 15172c0-1515-2-504-2-2022" svg:viewBox="0 0 3 2023">
            <text:p/>
          </draw:connector>
          <draw:connector draw:style-name="gr3" draw:text-style-name="P1" draw:layer="layout" draw:type="curve" svg:x1="17.901cm" svg:y1="15.171cm" svg:x2="17.899cm" svg:y2="13.151cm" draw:start-shape="id125" draw:start-glue-point="0" draw:end-shape="id126" draw:end-glue-point="2" svg:d="M17901 15171c0-1513-2-504-2-2020" svg:viewBox="0 0 3 2021">
            <text:p/>
          </draw:connector>
          <draw:connector draw:style-name="gr3" draw:text-style-name="P1" draw:layer="layout" draw:type="curve" svg:x1="21.503cm" svg:y1="15.146cm" svg:x2="21.5cm" svg:y2="13.152cm" draw:start-shape="id127" draw:start-glue-point="0" draw:end-shape="id128" draw:end-glue-point="2" svg:d="M21503 15146c0-1494-3-497-3-1994" svg:viewBox="0 0 4 1995">
            <text:p/>
          </draw:connector>
          <draw:connector draw:style-name="gr3" draw:text-style-name="P1" draw:layer="layout" draw:type="curve" svg:x1="25.177cm" svg:y1="15.121cm" svg:x2="25.174cm" svg:y2="13.127cm" draw:start-shape="id129" draw:start-glue-point="0" draw:end-shape="id130" draw:end-glue-point="2" svg:d="M25177 15121c0-1494-3-497-3-1994" svg:viewBox="0 0 4 1995">
            <text:p/>
          </draw:connector>
          <draw:connector draw:style-name="gr3" draw:text-style-name="P1" draw:layer="layout" draw:type="curve" svg:x1="29.912cm" svg:y1="15.117cm" svg:x2="29.893cm" svg:y2="13.102cm" draw:start-shape="id131" draw:start-glue-point="0" draw:end-shape="id132" draw:end-glue-point="2" svg:d="M29912 15117c0-1510-19-503-19-2015" svg:viewBox="0 0 20 2016">
            <text:p/>
          </draw:connector>
          <draw:connector draw:style-name="gr3" draw:text-style-name="P1" draw:layer="layout" draw:type="curve" svg:x1="33.413cm" svg:y1="15.118cm" svg:x2="29.893cm" svg:y2="13.102cm" draw:start-shape="id133" draw:start-glue-point="0" draw:end-shape="id132" draw:end-glue-point="2" svg:d="M33413 15118c0-1510-3520-503-3520-2016" svg:viewBox="0 0 3521 2017">
            <text:p/>
          </draw:connector>
          <draw:connector draw:style-name="gr3" draw:text-style-name="P1" draw:layer="layout" draw:type="curve" svg:x1="36.913cm" svg:y1="15.118cm" svg:x2="29.893cm" svg:y2="13.102cm" draw:start-shape="id134" draw:start-glue-point="0" draw:end-shape="id132" draw:end-glue-point="2" svg:d="M36913 15118c0-1510-7020-503-7020-2016" svg:viewBox="0 0 7021 2017">
            <text:p/>
          </draw:connector>
          <draw:connector draw:style-name="gr3" draw:text-style-name="P1" draw:layer="layout" draw:type="curve" svg:x1="40.414cm" svg:y1="15.119cm" svg:x2="29.893cm" svg:y2="13.102cm" draw:start-shape="id135" draw:start-glue-point="0" draw:end-shape="id132" draw:end-glue-point="2" svg:d="M40414 15119c0-1551-10521-543-10521-2017" svg:viewBox="0 0 10522 2018">
            <text:p/>
          </draw:connector>
          <draw:connector draw:style-name="gr5" draw:text-style-name="P1" draw:layer="layout" draw:type="curve" svg:x1="40.35cm" svg:y1="5.211cm" svg:x2="7.182cm" svg:y2="10.609cm" draw:start-shape="id105" draw:start-glue-point="2" draw:end-shape="id120" draw:end-glue-point="0" svg:d="M40350 5211c0 4089-33168 1390-33168 5398" svg:viewBox="0 0 33169 5399">
            <text:p/>
          </draw:connector>
          <draw:connector draw:style-name="gr5" draw:text-style-name="P1" draw:layer="layout" draw:type="curve" svg:x1="40.35cm" svg:y1="5.211cm" svg:x2="10.697cm" svg:y2="10.609cm" draw:start-shape="id105" draw:start-glue-point="2" draw:end-shape="id123" draw:end-glue-point="0" svg:d="M40350 5211c0 4089-29653 1390-29653 5398" svg:viewBox="0 0 29654 5399">
            <text:p/>
          </draw:connector>
          <draw:connector draw:style-name="gr5" draw:text-style-name="P1" draw:layer="layout" draw:type="curve" svg:x1="40.35cm" svg:y1="5.211cm" svg:x2="14.298cm" svg:y2="10.61cm" draw:start-shape="id105" draw:start-glue-point="2" draw:end-shape="id118" draw:end-glue-point="0" svg:d="M40350 5211c0 4089-26052 1390-26052 5399" svg:viewBox="0 0 26053 5400">
            <text:p/>
          </draw:connector>
          <draw:connector draw:style-name="gr5" draw:text-style-name="P1" draw:layer="layout" draw:type="curve" svg:x1="40.35cm" svg:y1="5.211cm" svg:x2="17.899cm" svg:y2="10.611cm" draw:start-shape="id105" draw:start-glue-point="2" draw:end-shape="id126" draw:end-glue-point="0" svg:d="M40350 5211c0 4090-22451 1391-22451 5400" svg:viewBox="0 0 22452 5401">
            <text:p/>
          </draw:connector>
          <draw:connector draw:style-name="gr5" draw:text-style-name="P1" draw:layer="layout" draw:type="curve" svg:x1="40.35cm" svg:y1="5.211cm" svg:x2="21.5cm" svg:y2="10.612cm" draw:start-shape="id105" draw:start-glue-point="2" draw:end-shape="id128" draw:end-glue-point="0" svg:d="M40350 5211c0 4090-18850 1390-18850 5401" svg:viewBox="0 0 18851 5402">
            <text:p/>
          </draw:connector>
          <draw:connector draw:style-name="gr5" draw:text-style-name="P1" draw:layer="layout" draw:type="curve" svg:x1="40.35cm" svg:y1="5.211cm" svg:x2="25.174cm" svg:y2="10.587cm" draw:start-shape="id105" draw:start-glue-point="2" draw:end-shape="id130" draw:end-glue-point="0" svg:d="M40350 5211c0 4072-15176 1385-15176 5376" svg:viewBox="0 0 15177 5377">
            <text:p/>
          </draw:connector>
          <draw:connector draw:style-name="gr5" draw:text-style-name="P1" draw:layer="layout" draw:type="curve" svg:x1="40.35cm" svg:y1="5.211cm" svg:x2="29.893cm" svg:y2="10.562cm" draw:start-shape="id105" draw:start-glue-point="2" draw:end-shape="id132" draw:end-glue-point="0" svg:d="M40350 5211c0 4053-10457 1378-10457 5351" svg:viewBox="0 0 10458 5352">
            <text:p/>
          </draw:connector>
          <draw:connector draw:style-name="gr3" draw:text-style-name="P1" draw:layer="layout" draw:type="curve" svg:x1="40.414cm" svg:y1="17.659cm" svg:x2="40.415cm" svg:y2="19.052cm" draw:start-shape="id135" draw:start-glue-point="2" draw:end-shape="id136" draw:end-glue-point="0" svg:d="M40414 17659c0 1045 1 349 1 1393" svg:viewBox="0 0 2 1394">
            <text:p/>
          </draw:connector>
          <draw:connector draw:style-name="gr3" draw:text-style-name="P1" draw:layer="layout" draw:type="curve" svg:x1="14.3cm" svg:y1="24.325cm" svg:x2="40.416cm" svg:y2="22.553cm" draw:start-shape="id137" draw:start-glue-point="2" draw:end-shape="id138" draw:end-glue-point="0" svg:d="M14300 24325c0 277 3265 554 6530 554 3264 0 6529-720 6529-1440 0-719 3264-1439 6529-1439 3264 0 6528 277 6528 553" svg:viewBox="0 0 26117 2880">
            <text:p/>
          </draw:connector>
          <draw:connector draw:style-name="gr3" draw:text-style-name="P1" draw:layer="layout" draw:type="curve" svg:x1="40.417cm" svg:y1="26.254cm" svg:x2="40.416cm" svg:y2="25.753cm" draw:start-shape="id139" draw:start-glue-point="0" draw:end-shape="id138" draw:end-glue-point="2" svg:d="M40417 26254c0-375-1-125-1-501" svg:viewBox="0 0 2 502">
            <text:p/>
          </draw:connector>
          <draw:connector draw:style-name="gr3" draw:text-style-name="P1" draw:layer="layout" draw:type="curve" svg:x1="40.415cm" svg:y1="29.255cm" svg:x2="40.417cm" svg:y2="28.794cm" draw:start-shape="id140" draw:start-glue-point="0" draw:end-shape="id139" draw:end-glue-point="2" svg:d="M40415 29255c0-345 2-115 2-461" svg:viewBox="0 0 3 462">
            <text:p/>
          </draw:connector>
          <draw:connector draw:style-name="gr3" draw:text-style-name="P1" draw:layer="layout" draw:type="curve" svg:x1="40.418cm" svg:y1="32.455cm" svg:x2="40.415cm" svg:y2="31.897cm" draw:start-shape="id102" draw:start-glue-point="0" draw:end-shape="id140" draw:end-glue-point="2" svg:d="M40418 32455c0-417-3-138-3-558" svg:viewBox="0 0 4 559">
            <text:p/>
          </draw:connector>
          <draw:connector draw:style-name="gr3" draw:text-style-name="P1" draw:layer="layout" draw:type="curve" svg:x1="40.419cm" svg:y1="40.256cm" svg:x2="40.415cm" svg:y2="39.637cm" draw:start-shape="id141" draw:start-glue-point="0" draw:end-shape="id101" draw:end-glue-point="2" svg:d="M40419 40256c0-463-4-154-4-619" svg:viewBox="0 0 5 620">
            <text:p/>
          </draw:connector>
          <draw:connector draw:style-name="gr3" draw:text-style-name="P1" draw:layer="layout" draw:type="curve" svg:x1="40.42cm" svg:y1="43.157cm" svg:x2="40.419cm" svg:y2="42.796cm" draw:start-shape="id142" draw:start-glue-point="0" draw:end-shape="id141" draw:end-glue-point="2" svg:d="M40420 43157c0-270-1-90-1-361" svg:viewBox="0 0 2 362">
            <text:p/>
          </draw:connector>
          <draw:connector draw:style-name="gr3" draw:text-style-name="P1" draw:layer="layout" draw:type="curve" svg:x1="40.422cm" svg:y1="58.459cm" svg:x2="40.421cm" svg:y2="57.998cm" draw:start-shape="id143" draw:start-glue-point="0" draw:end-shape="id144" draw:end-glue-point="2" svg:d="M40422 58459c0-345-1-115-1-461" svg:viewBox="0 0 2 462">
            <text:p/>
          </draw:connector>
          <draw:connector draw:style-name="gr3" draw:text-style-name="P1" draw:layer="layout" draw:type="curve" svg:x1="40.422cm" svg:y1="61.459cm" svg:x2="40.422cm" svg:y2="60.999cm" draw:start-shape="id145" draw:start-glue-point="0" draw:end-shape="id143" draw:end-glue-point="2" svg:d="M40422 61459v-460" svg:viewBox="0 0 1 461">
            <text:p/>
          </draw:connector>
          <draw:connector draw:style-name="gr3" draw:text-style-name="P1" draw:layer="layout" draw:type="curve" svg:x1="40.423cm" svg:y1="64.56cm" svg:x2="40.422cm" svg:y2="63.999cm" draw:start-shape="id146" draw:start-glue-point="0" draw:end-shape="id145" draw:end-glue-point="2" svg:d="M40423 64560c0-420-1-140-1-561" svg:viewBox="0 0 2 562">
            <text:p/>
          </draw:connector>
          <draw:connector draw:style-name="gr3" draw:text-style-name="P1" draw:layer="layout" draw:type="curve" svg:x1="31.925cm" svg:y1="70.762cm" svg:x2="40.423cm" svg:y2="67.1cm" draw:start-shape="id147" draw:start-glue-point="0" draw:end-shape="id146" draw:end-glue-point="2" svg:d="M31925 70762c0-2706 8498-875 8498-3662" svg:viewBox="0 0 8499 3663">
            <text:p/>
          </draw:connector>
          <draw:connector draw:style-name="gr3" draw:text-style-name="P1" draw:layer="layout" draw:type="curve" svg:x1="40.419cm" svg:y1="46.135cm" svg:x2="40.42cm" svg:y2="45.697cm" draw:start-shape="id148" draw:start-glue-point="0" draw:end-shape="id142" draw:end-glue-point="2" svg:d="M40419 46135c0-327 1-108 1-438" svg:viewBox="0 0 2 439">
            <text:p/>
          </draw:connector>
          <draw:connector draw:style-name="gr3" draw:text-style-name="P1" draw:layer="layout" draw:type="curve" svg:x1="40.42cm" svg:y1="49.657cm" svg:x2="40.419cm" svg:y2="49.285cm" draw:start-shape="id149" draw:start-glue-point="0" draw:end-shape="id148" draw:end-glue-point="2" svg:d="M40420 49657c0-277-1-92-1-372" svg:viewBox="0 0 2 373">
            <text:p/>
          </draw:connector>
          <draw:connector draw:style-name="gr3" draw:text-style-name="P1" draw:layer="layout" draw:type="curve" svg:x1="40.42cm" svg:y1="52.557cm" svg:x2="40.42cm" svg:y2="52.197cm" draw:start-shape="id150" draw:start-glue-point="0" draw:end-shape="id149" draw:end-glue-point="2" svg:d="M40420 52557v-360" svg:viewBox="0 0 1 361">
            <text:p/>
          </draw:connector>
          <draw:connector draw:style-name="gr3" draw:text-style-name="P1" draw:layer="layout" draw:type="curve" svg:x1="40.421cm" svg:y1="55.458cm" svg:x2="40.42cm" svg:y2="55.097cm" draw:start-shape="id144" draw:start-glue-point="0" draw:end-shape="id150" draw:end-glue-point="2" svg:d="M40421 55458c0-270-1-90-1-361" svg:viewBox="0 0 2 362">
            <text:p/>
          </draw:connector>
          <draw:connector draw:style-name="gr3" draw:text-style-name="P1" draw:layer="layout" draw:type="curve" svg:x1="35.924cm" svg:y1="70.761cm" svg:x2="40.423cm" svg:y2="67.1cm" draw:start-shape="id100" draw:end-shape="id146" draw:end-glue-point="2" svg:d="M35924 70761c0-2745 4499-915 4499-3661" svg:viewBox="0 0 4500 3662">
            <text:p/>
          </draw:connector>
          <draw:connector draw:style-name="gr3" draw:text-style-name="P1" draw:layer="layout" draw:type="curve" svg:x1="45.126cm" svg:y1="70.763cm" svg:x2="40.423cm" svg:y2="67.1cm" draw:start-shape="id151" draw:start-glue-point="0" draw:end-shape="id146" draw:end-glue-point="2" svg:d="M45126 70763c0-2746-4703-915-4703-3663" svg:viewBox="0 0 4704 3664">
            <text:p/>
          </draw:connector>
          <draw:connector draw:style-name="gr3" draw:text-style-name="P1" draw:layer="layout" draw:type="curve" svg:x1="48.827cm" svg:y1="70.764cm" svg:x2="40.423cm" svg:y2="67.1cm" draw:start-shape="id152" draw:start-glue-point="0" draw:end-shape="id146" draw:end-glue-point="2" svg:d="M48827 70764c0-2746-8404-915-8404-3664" svg:viewBox="0 0 8405 3665">
            <text:p/>
          </draw:connector>
          <draw:connector draw:style-name="gr2" draw:text-style-name="P1" draw:layer="layout" draw:type="curve" svg:x1="35.928cm" svg:y1="74.162cm" svg:x2="35.924cm" svg:y2="73.301cm" draw:start-shape="id153" draw:start-glue-point="0" draw:end-shape="id100" draw:end-glue-point="2" svg:d="M35928 74162c0-645-4-215-4-861" svg:viewBox="0 0 5 862">
            <text:p/>
          </draw:connector>
          <draw:connector draw:style-name="gr2" draw:text-style-name="P1" draw:layer="layout" draw:type="curve" svg:x1="23.327cm" svg:y1="80.764cm" svg:x2="35.928cm" svg:y2="78.836cm" draw:start-shape="id154" draw:start-glue-point="0" draw:end-shape="id153" draw:end-glue-point="2" svg:d="M23327 80764c0-1405 12601-442 12601-1928" svg:viewBox="0 0 12602 1929">
            <text:p/>
          </draw:connector>
          <draw:connector draw:style-name="gr2" draw:text-style-name="P1" draw:layer="layout" draw:type="curve" svg:x1="17.397cm" svg:y1="91.169cm" svg:x2="30.396cm" svg:y2="88.308cm" draw:start-shape="id155" draw:start-glue-point="0" draw:end-shape="id156" draw:end-glue-point="2" svg:d="M17397 91169c0-2145 12999-715 12999-2861" svg:viewBox="0 0 13000 2862">
            <text:p/>
          </draw:connector>
          <draw:connector draw:style-name="gr2" draw:text-style-name="P1" draw:layer="layout" draw:type="curve" svg:x1="21.113cm" svg:y1="91.165cm" svg:x2="30.396cm" svg:y2="88.308cm" draw:start-shape="id157" draw:start-glue-point="0" draw:end-shape="id156" draw:end-glue-point="2" svg:d="M21113 91165c0-2142 9283-714 9283-2857" svg:viewBox="0 0 9284 2858">
            <text:p/>
          </draw:connector>
          <draw:connector draw:style-name="gr2" draw:text-style-name="P1" draw:layer="layout" draw:type="curve" svg:x1="43.107cm" svg:y1="74.5cm" svg:x2="35.924cm" svg:y2="73.301cm" draw:start-shape="id158" draw:start-glue-point="0" draw:end-shape="id100" draw:end-glue-point="2" svg:d="M43107 74500c0-859-7183-260-7183-1199" svg:viewBox="0 0 7184 1200">
            <text:p/>
          </draw:connector>
          <draw:connector draw:style-name="gr2" draw:text-style-name="P1" draw:layer="layout" draw:type="curve" svg:x1="26.909cm" svg:y1="80.766cm" svg:x2="35.928cm" svg:y2="78.836cm" draw:start-shape="id159" draw:start-glue-point="0" draw:end-shape="id153" draw:end-glue-point="2" svg:d="M26909 80766c0-1408 9019-444 9019-1930" svg:viewBox="0 0 9020 1931">
            <text:p/>
          </draw:connector>
          <draw:connector draw:style-name="gr2" draw:text-style-name="P1" draw:layer="layout" draw:type="curve" svg:x1="35.928cm" svg:y1="78.836cm" svg:x2="30.528cm" svg:y2="80.765cm" draw:start-shape="id153" draw:start-glue-point="2" draw:end-shape="id160" draw:end-glue-point="0" svg:d="M35928 78836c0 1486-5400 522-5400 1929" svg:viewBox="0 0 5401 1930">
            <text:p/>
          </draw:connector>
          <draw:connector draw:style-name="gr2" draw:text-style-name="P1" draw:layer="layout" draw:type="curve" svg:x1="34.11cm" svg:y1="80.767cm" svg:x2="35.928cm" svg:y2="78.836cm" draw:start-shape="id161" draw:start-glue-point="0" draw:end-shape="id153" draw:end-glue-point="2" svg:d="M34110 80767c0-1408 1818-443 1818-1931" svg:viewBox="0 0 1819 1932">
            <text:p/>
          </draw:connector>
          <draw:connector draw:style-name="gr2" draw:text-style-name="P1" draw:layer="layout" draw:type="curve" svg:x1="24.814cm" svg:y1="91.166cm" svg:x2="30.396cm" svg:y2="88.308cm" draw:start-shape="id162" draw:start-glue-point="0" draw:end-shape="id156" draw:end-glue-point="2" svg:d="M24814 91166c0-2142 5582-713 5582-2858" svg:viewBox="0 0 5583 2859">
            <text:p/>
          </draw:connector>
          <draw:connector draw:style-name="gr2" draw:text-style-name="P1" draw:layer="layout" draw:type="curve" svg:x1="35.915cm" svg:y1="91.167cm" svg:x2="30.396cm" svg:y2="88.308cm" draw:start-shape="id163" draw:start-glue-point="0" draw:end-shape="id156" draw:end-glue-point="2" svg:d="M35915 91167c0-2143-5519-714-5519-2859" svg:viewBox="0 0 5520 2860">
            <text:p/>
          </draw:connector>
          <draw:connector draw:style-name="gr2" draw:text-style-name="P1" draw:layer="layout" draw:type="curve" svg:x1="39.715cm" svg:y1="91.167cm" svg:x2="30.396cm" svg:y2="88.308cm" draw:start-shape="id164" draw:start-glue-point="0" draw:end-shape="id156" draw:end-glue-point="2" svg:d="M39715 91167c0-2143-9319-714-9319-2859" svg:viewBox="0 0 9320 2860">
            <text:p/>
          </draw:connector>
          <draw:connector draw:style-name="gr2" draw:text-style-name="P1" draw:layer="layout" draw:type="curve" svg:x1="43.416cm" svg:y1="91.168cm" svg:x2="30.396cm" svg:y2="88.308cm" draw:start-shape="id165" draw:start-glue-point="0" draw:end-shape="id156" draw:end-glue-point="2" svg:d="M43416 91168c0-2143-13020-714-13020-2860" svg:viewBox="0 0 13021 2861">
            <text:p/>
          </draw:connector>
          <draw:connector draw:style-name="gr2" draw:text-style-name="P1" draw:layer="layout" draw:type="curve" svg:x1="37.826cm" svg:y1="80.763cm" svg:x2="35.928cm" svg:y2="78.836cm" draw:start-shape="id166" draw:start-glue-point="0" draw:end-shape="id153" draw:end-glue-point="2" svg:d="M37826 80763c0-1405-1898-442-1898-1927" svg:viewBox="0 0 1899 1928">
            <text:p/>
          </draw:connector>
          <draw:connector draw:style-name="gr2" draw:text-style-name="P1" draw:layer="layout" draw:type="curve" svg:x1="41.408cm" svg:y1="80.765cm" svg:x2="35.928cm" svg:y2="78.836cm" draw:start-shape="id167" draw:start-glue-point="0" draw:end-shape="id153" draw:end-glue-point="2" svg:d="M41408 80765c0-1407-5480-443-5480-1929" svg:viewBox="0 0 5481 1930">
            <text:p/>
          </draw:connector>
          <draw:connector draw:style-name="gr2" draw:text-style-name="P1" draw:layer="layout" draw:type="curve" svg:x1="45.027cm" svg:y1="80.764cm" svg:x2="35.928cm" svg:y2="78.836cm" draw:start-shape="id168" draw:start-glue-point="0" draw:end-shape="id153" draw:end-glue-point="2" svg:d="M45027 80764c0-1405-9099-442-9099-1928" svg:viewBox="0 0 9100 1929">
            <text:p/>
          </draw:connector>
          <draw:connector draw:style-name="gr2" draw:text-style-name="P1" draw:layer="layout" draw:type="curve" svg:x1="48.609cm" svg:y1="80.766cm" svg:x2="35.928cm" svg:y2="78.836cm" draw:start-shape="id169" draw:start-glue-point="0" draw:end-shape="id153" draw:end-glue-point="2" svg:d="M48609 80766c0-1407-12681-442-12681-1930" svg:viewBox="0 0 12682 1931">
            <text:p/>
          </draw:connector>
          <draw:connector draw:style-name="gr2" draw:text-style-name="P1" draw:layer="layout" draw:type="curve" svg:x1="30.396cm" svg:y1="85.768cm" svg:x2="34.11cm" svg:y2="83.307cm" draw:start-shape="id156" draw:start-glue-point="0" draw:end-shape="id161" draw:end-glue-point="2" svg:d="M30396 85768c0-1845 3714-615 3714-2461" svg:viewBox="0 0 3715 2462">
            <text:p/>
          </draw:connector>
          <draw:connector draw:style-name="gr2" draw:text-style-name="P1" draw:layer="layout" draw:type="curve" svg:x1="34.112cm" svg:y1="85.764cm" svg:x2="34.11cm" svg:y2="83.307cm" draw:start-shape="id170" draw:start-glue-point="0" draw:end-shape="id161" draw:end-glue-point="2" svg:d="M34112 85764c0-1842-2-614-2-2457" svg:viewBox="0 0 3 2458">
            <text:p/>
          </draw:connector>
          <draw:connector draw:style-name="gr2" draw:text-style-name="P1" draw:layer="layout" draw:type="curve" svg:x1="28.498cm" svg:y1="91.17cm" svg:x2="30.396cm" svg:y2="88.308cm" draw:start-shape="id171" draw:start-glue-point="0" draw:end-shape="id156" draw:end-glue-point="2" svg:d="M28498 91170c0-2145 1898-714 1898-2862" svg:viewBox="0 0 1899 2863">
            <text:p/>
          </draw:connector>
          <draw:connector draw:style-name="gr2" draw:text-style-name="P1" draw:layer="layout" draw:type="curve" svg:x1="32.214cm" svg:y1="91.166cm" svg:x2="30.396cm" svg:y2="88.308cm" draw:start-shape="id172" draw:start-glue-point="0" draw:end-shape="id156" draw:end-glue-point="2" svg:d="M32214 91166c0-2142-1818-713-1818-2858" svg:viewBox="0 0 1819 2859">
            <text:p/>
          </draw:connector>
          <draw:connector draw:style-name="gr2" draw:text-style-name="P1" draw:layer="layout" draw:type="curve" svg:x1="21.113cm" svg:y1="96.065cm" svg:x2="21.113cm" svg:y2="93.705cm" draw:start-shape="id173" draw:start-glue-point="0" draw:end-shape="id157" draw:end-glue-point="2" svg:d="M21113 96065v-2360" svg:viewBox="0 0 1 2361">
            <text:p/>
          </draw:connector>
          <draw:connector draw:style-name="gr2" draw:text-style-name="P1" draw:layer="layout" draw:type="curve" svg:x1="39.274cm" svg:y1="103.267cm" svg:x2="39.274cm" svg:y2="101.709cm" draw:start-shape="id174" draw:start-glue-point="0" draw:end-shape="id175" draw:end-glue-point="2" svg:d="M39274 103267v-1558" svg:viewBox="0 0 1 1559">
            <text:p/>
          </draw:connector>
          <draw:connector draw:style-name="gr2" draw:text-style-name="P1" draw:layer="layout" draw:type="curve" svg:x1="32.073cm" svg:y1="103.266cm" svg:x2="39.274cm" svg:y2="101.709cm" draw:start-shape="id176" draw:start-glue-point="0" draw:end-shape="id175" draw:end-glue-point="2" svg:d="M32073 103266c0-1167 7201-389 7201-1557" svg:viewBox="0 0 7202 1558">
            <text:p/>
          </draw:connector>
          <draw:connector draw:style-name="gr2" draw:text-style-name="P1" draw:layer="layout" draw:type="curve" svg:x1="39.283cm" svg:y1="107.468cm" svg:x2="42.856cm" svg:y2="105.809cm" draw:start-shape="id177" draw:start-glue-point="0" draw:end-shape="id178" draw:end-glue-point="2" svg:d="M39283 107468c0-1243 3573-414 3573-1659" svg:viewBox="0 0 3574 1660">
            <text:p/>
          </draw:connector>
          <draw:connector draw:style-name="gr2" draw:text-style-name="P1" draw:layer="layout" draw:type="curve" svg:x1="39.274cm" svg:y1="99.169cm" svg:x2="39.27cm" svg:y2="98.606cm" draw:start-shape="id175" draw:start-glue-point="0" draw:end-shape="id179" draw:end-glue-point="2" svg:d="M39274 99169c0-421-4-140-4-563" svg:viewBox="0 0 5 564">
            <text:p/>
          </draw:connector>
          <draw:connector draw:style-name="gr2" draw:text-style-name="P1" draw:layer="layout" draw:type="curve" svg:x1="35.655cm" svg:y1="103.268cm" svg:x2="39.274cm" svg:y2="101.709cm" draw:start-shape="id180" draw:start-glue-point="0" draw:end-shape="id175" draw:end-glue-point="2" svg:d="M35655 103268c0-1168 3619-389 3619-1559" svg:viewBox="0 0 3620 1560">
            <text:p/>
          </draw:connector>
          <draw:connector draw:style-name="gr2" draw:text-style-name="P1" draw:layer="layout" draw:type="curve" svg:x1="42.856cm" svg:y1="103.269cm" svg:x2="39.274cm" svg:y2="101.709cm" draw:start-shape="id178" draw:start-glue-point="0" draw:end-shape="id175" draw:end-glue-point="2" svg:d="M42856 103269c0-1168-3582-389-3582-1560" svg:viewBox="0 0 3583 1561">
            <text:p/>
          </draw:connector>
          <draw:connector draw:style-name="gr2" draw:text-style-name="P1" draw:layer="layout" draw:type="curve" svg:x1="46.572cm" svg:y1="103.265cm" svg:x2="39.274cm" svg:y2="101.709cm" draw:start-shape="id181" draw:start-glue-point="0" draw:end-shape="id175" draw:end-glue-point="2" svg:d="M46572 103265c0-1165-7298-388-7298-1556" svg:viewBox="0 0 7299 1557">
            <text:p/>
          </draw:connector>
          <draw:connector draw:style-name="gr2" draw:text-style-name="P1" draw:layer="layout" draw:type="curve" svg:x1="46.581cm" svg:y1="107.466cm" svg:x2="42.856cm" svg:y2="105.809cm" draw:start-shape="id182" draw:start-glue-point="0" draw:end-shape="id178" draw:end-glue-point="2" svg:d="M46581 107466c0-1242-3725-414-3725-1657" svg:viewBox="0 0 3726 1658">
            <text:p/>
          </draw:connector>
          <draw:connector draw:style-name="gr2" draw:text-style-name="P1" draw:layer="layout" draw:type="curve" svg:x1="24.695cm" svg:y1="96.067cm" svg:x2="21.113cm" svg:y2="93.705cm" draw:start-shape="id183" draw:start-glue-point="0" draw:end-shape="id157" draw:end-glue-point="2" svg:d="M24695 96067c0-1770-3582-589-3582-2362" svg:viewBox="0 0 3583 2363">
            <text:p/>
          </draw:connector>
          <draw:connector draw:style-name="gr2" draw:text-style-name="P1" draw:layer="layout" draw:type="curve" svg:x1="28.314cm" svg:y1="96.066cm" svg:x2="21.113cm" svg:y2="93.705cm" draw:start-shape="id184" draw:start-glue-point="0" draw:end-shape="id157" draw:end-glue-point="2" svg:d="M28314 96066c0-1770-7201-590-7201-2361" svg:viewBox="0 0 7202 2362">
            <text:p/>
          </draw:connector>
          <draw:connector draw:style-name="gr2" draw:text-style-name="P1" draw:layer="layout" draw:type="curve" svg:x1="50.408cm" svg:y1="111.967cm" svg:x2="39.283cm" svg:y2="110.008cm" draw:start-shape="id185" draw:start-glue-point="0" draw:end-shape="id177" draw:end-glue-point="2" svg:d="M50408 111967c0-1468-11125-489-11125-1959" svg:viewBox="0 0 11126 1960">
            <text:p/>
          </draw:connector>
          <draw:connector draw:style-name="gr2" draw:text-style-name="P1" draw:layer="layout" draw:type="curve" svg:x1="42.865cm" svg:y1="107.47cm" svg:x2="42.856cm" svg:y2="105.809cm" draw:start-shape="id186" draw:start-glue-point="0" draw:end-shape="id178" draw:end-glue-point="2" svg:d="M42865 107470c0-1245-9-415-9-1661" svg:viewBox="0 0 10 1662">
            <text:p/>
          </draw:connector>
          <draw:connector draw:style-name="gr2" draw:text-style-name="P1" draw:layer="layout" draw:type="curve" svg:x1="39.27cm" svg:y1="96.066cm" svg:x2="21.113cm" svg:y2="93.705cm" draw:start-shape="id179" draw:start-glue-point="0" draw:end-shape="id157" draw:end-glue-point="2" svg:d="M39270 96066c0-1770-18157-590-18157-2361" svg:viewBox="0 0 18158 2362">
            <text:p/>
          </draw:connector>
          <draw:connector draw:style-name="gr2" draw:text-style-name="P1" draw:layer="layout" draw:type="curve" svg:x1="28.508cm" svg:y1="111.967cm" svg:x2="39.283cm" svg:y2="110.008cm" draw:start-shape="id187" draw:start-glue-point="0" draw:end-shape="id177" draw:end-glue-point="2" svg:d="M28508 111967c0-1468 10775-489 10775-1959" svg:viewBox="0 0 10776 1960">
            <text:p/>
          </draw:connector>
          <draw:connector draw:style-name="gr2" draw:text-style-name="P1" draw:layer="layout" draw:type="curve" svg:x1="32.09cm" svg:y1="111.969cm" svg:x2="39.283cm" svg:y2="110.008cm" draw:start-shape="id188" draw:start-glue-point="0" draw:end-shape="id177" draw:end-glue-point="2" svg:d="M32090 111969c0-1470 7193-490 7193-1961" svg:viewBox="0 0 7194 1962">
            <text:p/>
          </draw:connector>
          <draw:connector draw:style-name="gr2" draw:text-style-name="P1" draw:layer="layout" draw:type="curve" svg:x1="35.709cm" svg:y1="111.968cm" svg:x2="39.283cm" svg:y2="110.008cm" draw:start-shape="id189" draw:start-glue-point="0" draw:end-shape="id177" draw:end-glue-point="2" svg:d="M35709 111968c0-1468 3574-489 3574-1960" svg:viewBox="0 0 3575 1961">
            <text:p/>
          </draw:connector>
          <draw:connector draw:style-name="gr2" draw:text-style-name="P1" draw:layer="layout" draw:type="curve" svg:x1="39.291cm" svg:y1="111.97cm" svg:x2="39.283cm" svg:y2="110.008cm" draw:start-shape="id190" draw:start-glue-point="0" draw:end-shape="id177" draw:end-glue-point="2" svg:d="M39291 111970c0-1470-8-489-8-1962" svg:viewBox="0 0 9 1963">
            <text:p/>
          </draw:connector>
          <draw:connector draw:style-name="gr2" draw:text-style-name="P1" draw:layer="layout" draw:type="curve" svg:x1="43.007cm" svg:y1="111.966cm" svg:x2="39.283cm" svg:y2="110.008cm" draw:start-shape="id191" draw:start-glue-point="0" draw:end-shape="id177" draw:end-glue-point="2" svg:d="M43007 111966c0-1467-3724-488-3724-1958" svg:viewBox="0 0 3725 1959">
            <text:p/>
          </draw:connector>
          <draw:connector draw:style-name="gr2" draw:text-style-name="P1" draw:layer="layout" draw:type="curve" svg:x1="46.692cm" svg:y1="111.971cm" svg:x2="39.283cm" svg:y2="110.008cm" draw:start-shape="id192" draw:start-glue-point="0" draw:end-shape="id177" draw:end-glue-point="2" svg:d="M46692 111971c0-1471-7409-490-7409-1963" svg:viewBox="0 0 7410 1964">
            <text:p/>
          </draw:connector>
          <draw:connector draw:style-name="gr2" draw:text-style-name="P1" draw:layer="layout" draw:type="curve" svg:x1="31.896cm" svg:y1="96.068cm" svg:x2="21.113cm" svg:y2="93.705cm" draw:start-shape="id193" draw:start-glue-point="0" draw:end-shape="id157" draw:end-glue-point="2" svg:d="M31896 96068c0-1771-10783-590-10783-2363" svg:viewBox="0 0 10784 2364">
            <text:p/>
          </draw:connector>
          <draw:connector draw:style-name="gr2" draw:text-style-name="P1" draw:layer="layout" draw:type="curve" svg:x1="35.612cm" svg:y1="96.064cm" svg:x2="21.113cm" svg:y2="93.705cm" draw:start-shape="id194" draw:start-glue-point="0" draw:end-shape="id157" draw:end-glue-point="2" svg:d="M35612 96064c0-1768-14499-589-14499-2359" svg:viewBox="0 0 14500 2360">
            <text:p/>
          </draw:connector>
          <draw:connector draw:style-name="gr6" draw:text-style-name="P1" draw:layer="layout" draw:type="curve" svg:x1="26.909cm" svg:y1="84.373cm" svg:x2="30.396cm" svg:y2="85.768cm" draw:start-shape="id159" draw:start-glue-point="2" draw:end-shape="id156" draw:end-glue-point="0" svg:d="M26909 84373c0 1047 3487 350 3487 1395" svg:viewBox="0 0 3488 1396">
            <text:p/>
          </draw:connector>
          <draw:connector draw:style-name="gr5" draw:text-style-name="P1" draw:layer="layout" draw:type="curve" svg:x1="38.891cm" svg:y1="20.322cm" svg:x2="15.824cm" svg:y2="23.004cm" draw:start-shape="id136" draw:start-glue-point="3" draw:end-shape="id137" draw:end-glue-point="1" svg:d="M38891 20322c-17298 0-5765 2682-23067 2682" svg:viewBox="0 0 23068 2683">
            <text:p/>
          </draw:connector>
          <draw:connector draw:style-name="gr5" draw:text-style-name="P1" draw:layer="layout" draw:type="curve" svg:x1="14.3cm" svg:y1="17.712cm" svg:x2="14.296cm" svg:y2="18.484cm" draw:start-shape="id124" draw:start-glue-point="2" draw:end-shape="id195" draw:end-glue-point="0" svg:d="M14300 17712c0 580-4 195-4 772" svg:viewBox="0 0 5 773">
            <text:p/>
          </draw:connector>
          <draw:connector draw:style-name="gr3" draw:text-style-name="P1" draw:layer="layout" draw:type="curve" svg:x1="14.3cm" svg:y1="21.683cm" svg:x2="14.296cm" svg:y2="21.024cm" draw:start-shape="id137" draw:start-glue-point="0" draw:end-shape="id195" draw:end-glue-point="2" svg:d="M14300 21683c0-532-4-203-4-659" svg:viewBox="0 0 5 660">
            <text:p/>
          </draw:connector>
          <draw:connector draw:style-name="gr3" draw:text-style-name="P1" draw:layer="layout" draw:type="curve" svg:x1="83.721cm" svg:y1="17.656cm" svg:x2="83.724cm" svg:y2="19.019cm" draw:start-shape="id115" draw:start-glue-point="2" draw:end-shape="id196" draw:end-glue-point="0" svg:d="M83721 17656c0 1023 3 342 3 1363" svg:viewBox="0 0 4 1364">
            <text:p/>
          </draw:connector>
          <draw:connector draw:style-name="gr5" draw:text-style-name="P1" draw:layer="layout" draw:type="curve" svg:x1="41.939cm" svg:y1="20.322cm" svg:x2="82.2cm" svg:y2="20.289cm" draw:start-shape="id136" draw:start-glue-point="1" draw:end-shape="id196" draw:end-glue-point="3" svg:d="M41939 20322c30235 0 10105-33 40261-33" svg:viewBox="0 0 40262 34">
            <text:p/>
          </draw:connector>
          <draw:custom-shape draw:style-name="gr7" draw:text-style-name="P31" xml:id="id116" draw:id="id116" draw:layer="layout" svg:width="10.947cm" svg:height="4.767cm" svg:x="50.049cm" svg:y="14.848cm">
            <text:p text:style-name="P30"><text:span text:style-name="T20">These three sons of David are not listed in </text:span><text:span text:style-name="T21">2Sa 5:14-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33" draw:layer="layout" svg:width="49.979cm" svg:height="3.298cm" svg:x="27.967cm" svg:y="14.736cm">
            <text:p text:style-name="P32"><text:span text:style-name="T21">Born</text:span></text:p>
            <text:p text:style-name="P32"><text:span text:style-name="T21">in</text:span></text:p>
            <text:p text:style-name="P32"><text:span text:style-name="T21">Jerusal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7" xml:id="id105" draw:id="id105" draw:layer="layout" svg:width="3.048cm" svg:height="2.54cm" svg:x="38.826cm" svg:y="2.671cm">
            <text:p text:style-name="P6"><text:span text:style-name="T3">David</text:span></text:p>
            <text:p text:style-name="P6"><text:span text:style-name="T4">1Ch 3:1</text:span></text:p>
            <text:p text:style-name="P6"><text:span text:style-name="T4">1Ch 2:1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7" xml:id="id121" draw:id="id121" draw:layer="layout" svg:width="3.048cm" svg:height="2.54cm" svg:x="5.658cm" svg:y="15.154cm">
            <text:p text:style-name="P6"><text:span text:style-name="T5">Amnon</text:span></text:p>
            <text:p text:style-name="P6"><text:span text:style-name="T4">1Ch 3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120" draw:id="id120" draw:layer="layout" svg:width="3.048cm" svg:height="2.54cm" svg:x="5.658cm" svg:y="10.609cm">
            <text:p text:style-name="P6"><text:span text:style-name="T3">Ahinoam</text:span></text:p>
            <text:p text:style-name="P6"><text:span text:style-name="T6">Jezreelitess</text:span></text:p>
            <text:p text:style-name="P6"><text:span text:style-name="T4">1Ch 3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123" draw:id="id123" draw:layer="layout" svg:width="3.048cm" svg:height="2.54cm" svg:x="9.173cm" svg:y="10.609cm">
            <text:p text:style-name="P6"><text:span text:style-name="T3">Abigail</text:span></text:p>
            <text:p text:style-name="P6"><text:span text:style-name="T6">Carmelitess</text:span></text:p>
            <text:p text:style-name="P6"><text:span text:style-name="T4">1Ch 3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22" draw:id="id122" draw:layer="layout" svg:width="3.048cm" svg:height="2.54cm" svg:x="9.17cm" svg:y="15.171cm">
            <text:p text:style-name="P9"><text:span text:style-name="T7">Daniel</text:span></text:p>
            <text:p text:style-name="P9"><text:span text:style-name="T8">1Ch 3:1</text:span></text:p>
            <text:p text:style-name="P10"><text:span text:style-name="T7">Chileab</text:span></text:p>
            <text:p text:style-name="P10"><text:span text:style-name="T8">2Sa 3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24" draw:id="id124" draw:layer="layout" svg:width="3.048cm" svg:height="2.54cm" svg:x="12.776cm" svg:y="15.172cm">
            <text:p text:style-name="P9"><text:span text:style-name="T7">Absalom</text:span></text:p>
            <text:p text:style-name="P9"><text:span text:style-name="T8">1Ch 3:2</text:span></text:p>
            <text:p text:style-name="P10"><text:span text:style-name="T7">Abishalom</text:span></text:p>
            <text:p text:style-name="P10"><text:span text:style-name="T8">1Ki 15: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118" draw:id="id118" draw:layer="layout" svg:width="3.048cm" svg:height="2.54cm" svg:x="12.774cm" svg:y="10.61cm">
            <text:p text:style-name="P6"><text:span text:style-name="T3">Maachah</text:span></text:p>
            <text:p text:style-name="P6"><text:span text:style-name="T4">1Ch 3: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7" xml:id="id119" draw:id="id119" draw:layer="layout" svg:width="3.048cm" svg:height="2.54cm" svg:x="12.796cm" svg:y="2.671cm">
            <text:p text:style-name="P6"><text:span text:style-name="T3">Talmai </text:span><text:span text:style-name="T6">king of Geshur</text:span></text:p>
            <text:p text:style-name="P6"><text:span text:style-name="T4">1Ch 3: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126" draw:id="id126" draw:layer="layout" svg:width="3.048cm" svg:height="2.54cm" svg:x="16.375cm" svg:y="10.611cm">
            <text:p text:style-name="P6"><text:span text:style-name="T3">Haggith</text:span></text:p>
            <text:p text:style-name="P6"><text:span text:style-name="T4">1Ch 3: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25" draw:id="id125" draw:layer="layout" svg:width="3.048cm" svg:height="2.54cm" svg:x="16.377cm" svg:y="15.171cm">
            <text:p text:style-name="P9"><text:span text:style-name="T7">Adonijah</text:span></text:p>
            <text:p text:style-name="P9"><text:span text:style-name="T8">1Ch 3: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128" draw:id="id128" draw:layer="layout" svg:width="3.048cm" svg:height="2.54cm" svg:x="19.976cm" svg:y="10.612cm">
            <text:p text:style-name="P6"><text:span text:style-name="T3">Abital</text:span></text:p>
            <text:p text:style-name="P6"><text:span text:style-name="T4">1Ch 3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2" draw:text-style-name="P11" xml:id="id127" draw:id="id127" draw:layer="layout" svg:width="3.099cm" svg:height="2.54cm" svg:x="19.954cm" svg:y="15.146cm">
            <text:p text:style-name="P9"><text:span text:style-name="T7">Shephatiah</text:span></text:p>
            <text:p text:style-name="P9"><text:span text:style-name="T8">1Ch 3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130" draw:id="id130" draw:layer="layout" svg:width="3.048cm" svg:height="2.54cm" svg:x="23.65cm" svg:y="10.587cm">
            <text:p text:style-name="P6"><text:span text:style-name="T3">Eglah</text:span></text:p>
            <text:p text:style-name="P6"><text:span text:style-name="T4">1Ch 3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29" draw:id="id129" draw:layer="layout" svg:width="3.048cm" svg:height="2.54cm" svg:x="23.653cm" svg:y="15.121cm">
            <text:p text:style-name="P9"><text:span text:style-name="T7">Ithream</text:span></text:p>
            <text:p text:style-name="P9"><text:span text:style-name="T8">1Ch 3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3" draw:text-style-name="P35" draw:layer="layout" svg:width="23.667cm" svg:height="3.132cm" svg:x="3.653cm" svg:y="14.816cm">
            <text:p text:style-name="P34"><text:span text:style-name="T20">Born</text:span></text:p>
            <text:p text:style-name="P34"><text:span text:style-name="T20">in</text:span></text:p>
            <text:p text:style-name="P34"><text:span text:style-name="T20">Hebr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132" draw:id="id132" draw:layer="layout" svg:width="3.048cm" svg:height="2.54cm" svg:x="28.369cm" svg:y="10.562cm">
            <text:p text:style-name="P6"><text:span text:style-name="T3">Bath-shua</text:span></text:p>
            <text:p text:style-name="P6"><text:span text:style-name="T4">1Ch 3:5</text:span></text:p>
            <text:p text:style-name="P14"><text:span text:style-name="T3">Bath-sheba</text:span></text:p>
            <text:p text:style-name="P14"><text:span text:style-name="T4">2Sa 11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31" draw:id="id131" draw:layer="layout" svg:width="3.048cm" svg:height="2.54cm" svg:x="28.388cm" svg:y="15.117cm">
            <text:p text:style-name="P9"><text:span text:style-name="T7">Shimea</text:span></text:p>
            <text:p text:style-name="P9"><text:span text:style-name="T8">1Ch 3:5</text:span></text:p>
            <text:p text:style-name="P10"><text:span text:style-name="T7">Shammua</text:span></text:p>
            <text:p text:style-name="P10"><text:span text:style-name="T8">2Sa 5:13</text:span></text:p>
            <text:p text:style-name="P10"><text:span text:style-name="T8">1Ch 14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33" draw:id="id133" draw:layer="layout" svg:width="3.048cm" svg:height="2.54cm" svg:x="31.889cm" svg:y="15.118cm">
            <text:p text:style-name="P9"><text:span text:style-name="T7">Shobab</text:span></text:p>
            <text:p text:style-name="P9"><text:span text:style-name="T8">1Ch 3: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34" draw:id="id134" draw:layer="layout" svg:width="3.048cm" svg:height="2.54cm" svg:x="35.389cm" svg:y="15.118cm">
            <text:p text:style-name="P9"><text:span text:style-name="T7">Nathan</text:span></text:p>
            <text:p text:style-name="P9"><text:span text:style-name="T8">1Ch 3: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135" draw:id="id135" draw:layer="layout" svg:width="3.048cm" svg:height="2.54cm" svg:x="38.89cm" svg:y="15.119cm">
            <text:p text:style-name="P9"><text:span text:style-name="T7">Solomon</text:span></text:p>
            <text:p text:style-name="P9"><text:span text:style-name="T8">1Ch 3:5</text:span></text:p>
            <text:p text:style-name="P10"><text:span text:style-name="T7">Jedidiah</text:span></text:p>
            <text:p text:style-name="P10"><text:span text:style-name="T8">2Sa 12:2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06" draw:id="id106" draw:layer="layout" svg:width="3.048cm" svg:height="2.54cm" svg:x="43.094cm" svg:y="15.113cm">
            <text:p text:style-name="P9"><text:span text:style-name="T7">Ibhar</text:span></text:p>
            <text:p text:style-name="P9"><text:span text:style-name="T8">1Ch 3: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07" draw:id="id107" draw:layer="layout" svg:width="3.048cm" svg:height="2.54cm" svg:x="46.695cm" svg:y="15.114cm">
            <text:p text:style-name="P9"><text:span text:style-name="T7">Elishama</text:span></text:p>
            <text:p text:style-name="P9"><text:span text:style-name="T8">1Ch 3:6</text:span></text:p>
            <text:p text:style-name="P10"><text:span text:style-name="T7">Elishua</text:span></text:p>
            <text:p text:style-name="P10"><text:span text:style-name="T8">2Sa 5:15</text:span></text:p>
            <text:p text:style-name="P10"><text:span text:style-name="T8">1Ch 14: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08" draw:id="id108" draw:layer="layout" svg:width="3.048cm" svg:height="2.54cm" svg:x="50.295cm" svg:y="15.114cm">
            <text:p text:style-name="P9"><text:span text:style-name="T7">Eliphelet</text:span></text:p>
            <text:p text:style-name="P9"><text:span text:style-name="T8">1Ch 3:6</text:span></text:p>
            <text:p text:style-name="P10"><text:span text:style-name="T7">Elpalet</text:span></text:p>
            <text:p text:style-name="P10"><text:span text:style-name="T8">1Ch 14: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09" draw:id="id109" draw:layer="layout" svg:width="3.048cm" svg:height="2.54cm" svg:x="53.996cm" svg:y="15.115cm">
            <text:p text:style-name="P9"><text:span text:style-name="T7">Nogah</text:span></text:p>
            <text:p text:style-name="P9"><text:span text:style-name="T8">1Ch 3: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10" draw:id="id110" draw:layer="layout" svg:width="3.048cm" svg:height="2.54cm" svg:x="57.695cm" svg:y="15.114cm">
            <text:p text:style-name="P9"><text:span text:style-name="T7">Nepheg</text:span></text:p>
            <text:p text:style-name="P9"><text:span text:style-name="T8">1Ch 3: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11" draw:id="id111" draw:layer="layout" svg:width="3.048cm" svg:height="2.54cm" svg:x="61.396cm" svg:y="15.115cm">
            <text:p text:style-name="P9"><text:span text:style-name="T7">Japhia</text:span></text:p>
            <text:p text:style-name="P9"><text:span text:style-name="T8">1Ch 3: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12" draw:id="id112" draw:layer="layout" svg:width="3.048cm" svg:height="2.54cm" svg:x="65.096cm" svg:y="15.115cm">
            <text:p text:style-name="P9"><text:span text:style-name="T7">Elishama</text:span></text:p>
            <text:p text:style-name="P9"><text:span text:style-name="T8">1Ch 3: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13" draw:id="id113" draw:layer="layout" svg:width="3.048cm" svg:height="2.54cm" svg:x="68.797cm" svg:y="15.116cm">
            <text:p text:style-name="P9"><text:span text:style-name="T7">Eliada</text:span></text:p>
            <text:p text:style-name="P9"><text:span text:style-name="T8">1Ch 3:8</text:span></text:p>
            <text:p text:style-name="P10"><text:span text:style-name="T7">Beeliada</text:span></text:p>
            <text:p text:style-name="P10"><text:span text:style-name="T8">1Ch 14: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14" draw:id="id114" draw:layer="layout" svg:width="3.048cm" svg:height="2.54cm" svg:x="72.498cm" svg:y="15.117cm">
            <text:p text:style-name="P9"><text:span text:style-name="T7">Eliphelet</text:span></text:p>
            <text:p text:style-name="P9"><text:span text:style-name="T8">1Ch 3:8</text:span></text:p>
            <text:p text:style-name="P10"><text:span text:style-name="T7">Eliphalet</text:span></text:p>
            <text:p text:style-name="P10"><text:span text:style-name="T8">2Sa 5:16</text:span></text:p>
            <text:p text:style-name="P10"><text:span text:style-name="T8">1Ch 14: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4" draw:text-style-name="P15" xml:id="id104" draw:id="id104" draw:layer="layout" svg:width="3.048cm" svg:height="2.54cm" svg:x="78.399cm" svg:y="15.118cm">
            <text:p text:style-name="P9"><text:span text:style-name="T7">Tamar</text:span></text:p>
            <text:p text:style-name="P9"><text:span text:style-name="T8">1Ch 3: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136" draw:id="id136" draw:layer="layout" svg:width="3.048cm" svg:height="2.54cm" svg:x="38.891cm" svg:y="19.052cm">
            <text:p text:style-name="P9"><text:span text:style-name="T7">Rehoboam</text:span></text:p>
            <text:p text:style-name="P9"><text:span text:style-name="T8">1Ch 3:10</text:span></text:p>
            <text:p text:style-name="P10"><text:span text:style-name="T7">Roboam</text:span></text:p>
            <text:p text:style-name="P10"><text:span text:style-name="T8">Mat 1: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5" draw:text-style-name="P11" xml:id="id138" draw:id="id138" draw:layer="layout" svg:width="3.048cm" svg:height="3.2cm" svg:x="38.892cm" svg:y="22.553cm">
            <text:p text:style-name="P9"><text:span text:style-name="T7">Abia</text:span></text:p>
            <text:p text:style-name="P9"><text:span text:style-name="T8">1Ch 3:10</text:span></text:p>
            <text:p text:style-name="P10"><text:span text:style-name="T7">Abijam</text:span></text:p>
            <text:p text:style-name="P10"><text:span text:style-name="T8">1Ki 14:31</text:span></text:p>
            <text:p text:style-name="P10"><text:span text:style-name="T7">Abijah</text:span></text:p>
            <text:p text:style-name="P10"><text:span text:style-name="T8">2Ch 12: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139" draw:id="id139" draw:layer="layout" svg:width="3.048cm" svg:height="2.54cm" svg:x="38.893cm" svg:y="26.254cm">
            <text:p text:style-name="P9"><text:span text:style-name="T7">Asa</text:span></text:p>
            <text:p text:style-name="P9"><text:span text:style-name="T8">1Ch 3:10</text:span></text:p>
            <text:p text:style-name="P9"><text:span text:style-name="T8">1Ki 15:8</text:span></text:p>
            <text:p text:style-name="P9"><text:span text:style-name="T8">2Ch 14: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6" draw:text-style-name="P11" xml:id="id140" draw:id="id140" draw:layer="layout" svg:width="3.708cm" svg:height="2.642cm" svg:x="38.561cm" svg:y="29.255cm">
            <text:p text:style-name="P9"><text:span text:style-name="T7">Jehosphaphat</text:span></text:p>
            <text:p text:style-name="P9"><text:span text:style-name="T8">1Ch 3:10</text:span></text:p>
            <text:p text:style-name="P9"><text:span text:style-name="T8">1Ki 15:24</text:span></text:p>
            <text:p text:style-name="P10"><text:span text:style-name="T7">Josaphat</text:span></text:p>
            <text:p text:style-name="P10"><text:span text:style-name="T8">Mat 1: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102" draw:id="id102" draw:layer="layout" svg:width="3.048cm" svg:height="2.54cm" svg:x="38.894cm" svg:y="32.455cm">
            <text:p text:style-name="P9"><text:span text:style-name="T7">Joram</text:span></text:p>
            <text:p text:style-name="P9"><text:span text:style-name="T8">1Ch 3:11</text:span></text:p>
            <text:p text:style-name="P10"><text:span text:style-name="T7">Jehoram</text:span></text:p>
            <text:p text:style-name="P10"><text:span text:style-name="T8">1Ki 22:5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7" draw:text-style-name="P11" xml:id="id101" draw:id="id101" draw:layer="layout" svg:width="3.048cm" svg:height="3.81cm" svg:x="38.891cm" svg:y="35.827cm">
            <text:p text:style-name="P9"><text:span text:style-name="T9">Younger</text:span><text:span text:style-name="T7"> Ahaziah</text:span></text:p>
            <text:p text:style-name="P9"><text:span text:style-name="T8">1Ch 3:11</text:span></text:p>
            <text:p text:style-name="P10"><text:span text:style-name="T7">Jehoahaz</text:span></text:p>
            <text:p text:style-name="P10"><text:span text:style-name="T8">2Ch 21:17</text:span></text:p>
            <text:p text:style-name="P10"><text:span text:style-name="T7">Azariah</text:span></text:p>
            <text:p text:style-name="P10"><text:span text:style-name="T8">2Ch 22: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141" draw:id="id141" draw:layer="layout" svg:width="3.048cm" svg:height="2.54cm" svg:x="38.895cm" svg:y="40.256cm">
            <text:p text:style-name="P9"><text:span text:style-name="T7">Joash</text:span></text:p>
            <text:p text:style-name="P9"><text:span text:style-name="T8">1Ch 3:11</text:span></text:p>
            <text:p text:style-name="P9"><text:span text:style-name="T8">2Ki 11:12</text:span></text:p>
            <text:p text:style-name="P10"><text:span text:style-name="T7">Jehoash</text:span></text:p>
            <text:p text:style-name="P10"><text:span text:style-name="T8">2Ki 11: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142" draw:id="id142" draw:layer="layout" svg:width="3.048cm" svg:height="2.54cm" svg:x="38.896cm" svg:y="43.157cm">
            <text:p text:style-name="P9"><text:span text:style-name="T7">Amaziah</text:span></text:p>
            <text:p text:style-name="P9"><text:span text:style-name="T8">1Ch 3:12</text:span></text:p>
            <text:p text:style-name="P9"><text:span text:style-name="T8">2Ki 12:20,21</text:span></text:p>
            <text:p text:style-name="P9"><text:span text:style-name="T8">2Ch 24:2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11" xml:id="id148" draw:id="id148" draw:layer="layout" svg:width="3.048cm" svg:height="3.15cm" svg:x="38.895cm" svg:y="46.135cm">
            <text:p text:style-name="P9"><text:span text:style-name="T7">Azariah</text:span></text:p>
            <text:p text:style-name="P9"><text:span text:style-name="T8">1Ch 3:12</text:span></text:p>
            <text:p text:style-name="P10"><text:span text:style-name="T7">Uzziah</text:span></text:p>
            <text:p text:style-name="P10"><text:span text:style-name="T8">2Ch 26:1</text:span></text:p>
            <text:p text:style-name="P10"><text:span text:style-name="T7">Ozias</text:span></text:p>
            <text:p text:style-name="P10"><text:span text:style-name="T8">Mat 1:8,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149" draw:id="id149" draw:layer="layout" svg:width="3.048cm" svg:height="2.54cm" svg:x="38.896cm" svg:y="49.657cm">
            <text:p text:style-name="P9"><text:span text:style-name="T7">Jotham</text:span></text:p>
            <text:p text:style-name="P9"><text:span text:style-name="T8">1Ch 3:12</text:span></text:p>
            <text:p text:style-name="P10"><text:span text:style-name="T7">Joatham</text:span></text:p>
            <text:p text:style-name="P10"><text:span text:style-name="T8">Mat 1: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150" draw:id="id150" draw:layer="layout" svg:width="3.048cm" svg:height="2.54cm" svg:x="38.896cm" svg:y="52.557cm">
            <text:p text:style-name="P9"><text:span text:style-name="T7">Ahaz</text:span></text:p>
            <text:p text:style-name="P9"><text:span text:style-name="T8">1Ch 3:13</text:span></text:p>
            <text:p text:style-name="P10"><text:span text:style-name="T7">Achaz</text:span></text:p>
            <text:p text:style-name="P10"><text:span text:style-name="T8">Mat 1: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144" draw:id="id144" draw:layer="layout" svg:width="3.048cm" svg:height="2.54cm" svg:x="38.897cm" svg:y="55.458cm">
            <text:p text:style-name="P9"><text:span text:style-name="T7">Hezekiah</text:span></text:p>
            <text:p text:style-name="P9"><text:span text:style-name="T8">1Ch 3:13</text:span></text:p>
            <text:p text:style-name="P10"><text:span text:style-name="T7">Ezekias</text:span></text:p>
            <text:p text:style-name="P10"><text:span text:style-name="T8">Mat 1:9,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143" draw:id="id143" draw:layer="layout" svg:width="3.048cm" svg:height="2.54cm" svg:x="38.898cm" svg:y="58.459cm">
            <text:p text:style-name="P9"><text:span text:style-name="T7">Manasseh</text:span></text:p>
            <text:p text:style-name="P9"><text:span text:style-name="T8">1Ch 3:13</text:span></text:p>
            <text:p text:style-name="P10"><text:span text:style-name="T7">Manasses</text:span></text:p>
            <text:p text:style-name="P10"><text:span text:style-name="T8">Mat 1: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145" draw:id="id145" draw:layer="layout" svg:width="3.048cm" svg:height="2.54cm" svg:x="38.898cm" svg:y="61.459cm">
            <text:p text:style-name="P9"><text:span text:style-name="T7">Amon</text:span></text:p>
            <text:p text:style-name="P9"><text:span text:style-name="T8">1Ch 3:14</text:span></text:p>
            <text:p text:style-name="P9"><text:span text:style-name="T8">2Ki 21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146" draw:id="id146" draw:layer="layout" svg:width="3.048cm" svg:height="2.54cm" svg:x="38.899cm" svg:y="64.56cm">
            <text:p text:style-name="P9"><text:span text:style-name="T7">Josiah</text:span></text:p>
            <text:p text:style-name="P9"><text:span text:style-name="T8">1Ch 3:14</text:span></text:p>
            <text:p text:style-name="P10"><text:span text:style-name="T7">Josias</text:span></text:p>
            <text:p text:style-name="P10"><text:span text:style-name="T8">Mat 1:10,1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100" draw:id="id100" draw:layer="layout" svg:width="3.048cm" svg:height="2.54cm" svg:x="34.4cm" svg:y="70.761cm">
            <text:p text:style-name="P9"><text:span text:style-name="T7">Jehoiakim</text:span></text:p>
            <text:p text:style-name="P9"><text:span text:style-name="T8">1Ch 3:15</text:span></text:p>
            <text:p text:style-name="P10"><text:span text:style-name="T7">Eliakim</text:span></text:p>
            <text:p text:style-name="P10"><text:span text:style-name="T8">2Ki 23:3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47" draw:id="id147" draw:layer="layout" svg:width="3.048cm" svg:height="2.54cm" svg:x="30.401cm" svg:y="70.762cm">
            <text:p text:style-name="P9"><text:span text:style-name="T5">Johanan</text:span></text:p>
            <text:p text:style-name="P9"><text:span text:style-name="T8">1Ch 3:1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151" draw:id="id151" draw:layer="layout" svg:width="3.048cm" svg:height="2.54cm" svg:x="43.602cm" svg:y="70.763cm">
            <text:p text:style-name="P9"><text:span text:style-name="T7">Zedekiah</text:span></text:p>
            <text:p text:style-name="P9"><text:span text:style-name="T8">1Ch 3:15</text:span></text:p>
            <text:p text:style-name="P10"><text:span text:style-name="T7">Mattaniah</text:span></text:p>
            <text:p text:style-name="P10"><text:span text:style-name="T8">2Ki 24: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11" xml:id="id152" draw:id="id152" draw:layer="layout" svg:width="3.048cm" svg:height="2.54cm" svg:x="47.303cm" svg:y="70.764cm">
            <text:p text:style-name="P9"><text:span text:style-name="T7">Shallum</text:span></text:p>
            <text:p text:style-name="P9"><text:span text:style-name="T8">1Ch 3:15</text:span></text:p>
            <text:p text:style-name="P10"><text:span text:style-name="T7">Jehoahaz</text:span></text:p>
            <text:p text:style-name="P10"><text:span text:style-name="T8">2Ki 23:3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9" draw:text-style-name="P11" xml:id="id153" draw:id="id153" draw:layer="layout" svg:width="3.15cm" svg:height="4.674cm" svg:x="34.353cm" svg:y="74.162cm">
            <text:p text:style-name="P9"><text:span text:style-name="T7">Jeconiah</text:span></text:p>
            <text:p text:style-name="P9"><text:span text:style-name="T8">1Ch 3:16</text:span></text:p>
            <text:p text:style-name="P10"><text:span text:style-name="T7">Elder Jehoiachin</text:span></text:p>
            <text:p text:style-name="P10"><text:span text:style-name="T8">2Ki 24:6</text:span></text:p>
            <text:p text:style-name="P10"><text:span text:style-name="T7">Coniah</text:span></text:p>
            <text:p text:style-name="P10"><text:span text:style-name="T8">Jer 22:24</text:span></text:p>
            <text:p text:style-name="P10"><text:span text:style-name="T7">Jechonias</text:span></text:p>
            <text:p text:style-name="P10"><text:span text:style-name="T8">Mat 1:1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58" draw:id="id158" draw:layer="layout" svg:width="3.048cm" svg:height="2.54cm" svg:x="41.583cm" svg:y="74.5cm">
            <text:p text:style-name="P9"><text:span text:style-name="T7">Zedekiah</text:span></text:p>
            <text:p text:style-name="P9"><text:span text:style-name="T8">1Ch 3: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66" draw:id="id166" draw:layer="layout" svg:width="3.048cm" svg:height="2.54cm" svg:x="36.302cm" svg:y="80.763cm">
            <text:p text:style-name="P9"><text:span text:style-name="T7">Shenazar</text:span></text:p>
            <text:p text:style-name="P9"><text:span text:style-name="T8">1Ch 3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67" draw:id="id167" draw:layer="layout" svg:width="3.048cm" svg:height="2.54cm" svg:x="39.884cm" svg:y="80.765cm">
            <text:p text:style-name="P9"><text:span text:style-name="T7">Jecamiah</text:span></text:p>
            <text:p text:style-name="P9"><text:span text:style-name="T8">1Ch 3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68" draw:id="id168" draw:layer="layout" svg:width="3.048cm" svg:height="2.54cm" svg:x="43.503cm" svg:y="80.764cm">
            <text:p text:style-name="P9"><text:span text:style-name="T7">Hoshama</text:span></text:p>
            <text:p text:style-name="P9"><text:span text:style-name="T8">1Ch 3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69" draw:id="id169" draw:layer="layout" svg:width="3.048cm" svg:height="2.54cm" svg:x="47.085cm" svg:y="80.766cm">
            <text:p text:style-name="P9"><text:span text:style-name="T7">Nedabiah</text:span></text:p>
            <text:p text:style-name="P9"><text:span text:style-name="T8">1Ch 3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54" draw:id="id154" draw:layer="layout" svg:width="3.048cm" svg:height="2.54cm" svg:x="21.803cm" svg:y="80.764cm">
            <text:p text:style-name="P9"><text:span text:style-name="T7">Assir</text:span></text:p>
            <text:p text:style-name="P9"><text:span text:style-name="T8">1Ch 3: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0" draw:text-style-name="P11" xml:id="id159" draw:id="id159" draw:layer="layout" svg:width="3.048cm" svg:height="3.607cm" svg:x="25.385cm" svg:y="80.766cm">
            <text:p text:style-name="P9"><text:span text:style-name="T7">Salathiel</text:span></text:p>
            <text:p text:style-name="P9"><text:span text:style-name="T8">1Ch 3:17</text:span></text:p>
            <text:p text:style-name="P10"><text:span text:style-name="T7">Shealtiel</text:span></text:p>
            <text:p text:style-name="P10"><text:span text:style-name="T8">Ezr 3:2,8</text:span></text:p>
            <text:p text:style-name="P10"><text:span text:style-name="T8">Neh 12:1</text:span></text:p>
            <text:p text:style-name="P10"><text:span text:style-name="T8">Hag 1:1,12,14, 2:2, 2: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60" draw:id="id160" draw:layer="layout" svg:width="3.048cm" svg:height="2.54cm" svg:x="29.004cm" svg:y="80.765cm">
            <text:p text:style-name="P9"><text:span text:style-name="T7">Malchiram</text:span></text:p>
            <text:p text:style-name="P9"><text:span text:style-name="T8">1Ch 3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61" draw:id="id161" draw:layer="layout" svg:width="3.048cm" svg:height="2.54cm" svg:x="32.586cm" svg:y="80.767cm">
            <text:p text:style-name="P9"><text:span text:style-name="T7">Pedaiah</text:span></text:p>
            <text:p text:style-name="P9"><text:span text:style-name="T8">1Ch 3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70" draw:id="id170" draw:layer="layout" svg:width="3.048cm" svg:height="2.54cm" svg:x="32.588cm" svg:y="85.764cm">
            <text:p text:style-name="P9"><text:span text:style-name="T7">Shimei</text:span></text:p>
            <text:p text:style-name="P9"><text:span text:style-name="T8">1Ch 3: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56" draw:id="id156" draw:layer="layout" svg:width="3.048cm" svg:height="2.54cm" svg:x="28.872cm" svg:y="85.768cm">
            <text:p text:style-name="P9"><text:span text:style-name="T7">Zerubbabel</text:span></text:p>
            <text:p text:style-name="P9"><text:span text:style-name="T8">1Ch 3:19</text:span></text:p>
            <text:p text:style-name="P10"><text:span text:style-name="T7">Zorobabel</text:span></text:p>
            <text:p text:style-name="P10"><text:span text:style-name="T8">Mat 1:12</text:span></text:p>
            <text:p text:style-name="P10"><text:span text:style-name="T8">Luk 3:2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57" draw:id="id157" draw:layer="layout" svg:width="3.048cm" svg:height="2.54cm" svg:x="19.589cm" svg:y="91.165cm">
            <text:p text:style-name="P9"><text:span text:style-name="T7">Hananiah</text:span></text:p>
            <text:p text:style-name="P9"><text:span text:style-name="T8">1Ch 3: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55" draw:id="id155" draw:layer="layout" svg:width="3.048cm" svg:height="2.54cm" svg:x="15.873cm" svg:y="91.169cm">
            <text:p text:style-name="P9"><text:span text:style-name="T7">Meshullam</text:span></text:p>
            <text:p text:style-name="P9"><text:span text:style-name="T8">1Ch 3: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16" xml:id="id162" draw:id="id162" draw:layer="layout" svg:width="3.048cm" svg:height="2.54cm" svg:x="23.29cm" svg:y="91.166cm">
            <text:p text:style-name="P9"><text:span text:style-name="T7">Shelomith</text:span></text:p>
            <text:p text:style-name="P9"><text:span text:style-name="T8">1Ch 3: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172" draw:id="id172" draw:layer="layout" svg:width="3.048cm" svg:height="2.54cm" svg:x="30.69cm" svg:y="91.166cm">
            <text:p text:style-name="P9"><text:span text:style-name="T7">Ohel</text:span></text:p>
            <text:p text:style-name="P9"><text:span text:style-name="T8">1Ch 3: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171" draw:id="id171" draw:layer="layout" svg:width="3.048cm" svg:height="2.54cm" svg:x="26.974cm" svg:y="91.17cm">
            <text:p text:style-name="P9"><text:span text:style-name="T7">Hashubah</text:span></text:p>
            <text:p text:style-name="P9"><text:span text:style-name="T8">1Ch 3: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163" draw:id="id163" draw:layer="layout" svg:width="3.048cm" svg:height="2.54cm" svg:x="34.391cm" svg:y="91.167cm">
            <text:p text:style-name="P9"><text:span text:style-name="T7">Berechiah</text:span></text:p>
            <text:p text:style-name="P9"><text:span text:style-name="T8">1Ch 3: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164" draw:id="id164" draw:layer="layout" svg:width="3.048cm" svg:height="2.54cm" svg:x="38.191cm" svg:y="91.167cm">
            <text:p text:style-name="P9"><text:span text:style-name="T7">Hasadiah</text:span></text:p>
            <text:p text:style-name="P9"><text:span text:style-name="T8">1Ch 3: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165" draw:id="id165" draw:layer="layout" svg:width="3.048cm" svg:height="2.54cm" svg:x="41.892cm" svg:y="91.168cm">
            <text:p text:style-name="P9"><text:span text:style-name="T7">Jushab-hesed</text:span></text:p>
            <text:p text:style-name="P9"><text:span text:style-name="T8">1Ch 3: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194" draw:id="id194" draw:layer="layout" svg:width="3.048cm" svg:height="2.54cm" svg:x="34.088cm" svg:y="96.064cm">
            <text:p text:style-name="P9"><text:span text:style-name="T7">Obadiah</text:span></text:p>
            <text:p text:style-name="P9"><text:span text:style-name="T8">1Ch 3: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2" draw:text-style-name="P17" xml:id="id179" draw:id="id179" draw:layer="layout" svg:width="3.2cm" svg:height="2.54cm" svg:x="37.67cm" svg:y="96.066cm">
            <text:p text:style-name="P9"><text:span text:style-name="T7">Shechaniah</text:span></text:p>
            <text:p text:style-name="P9"><text:span text:style-name="T8">1Ch 3:21</text:span></text:p>
            <text:p text:style-name="P9"><text:span text:style-name="T8">Ezr 8:3,5</text:span><text:span text:style-name="T10">*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73" draw:id="id173" draw:layer="layout" svg:width="3.048cm" svg:height="2.54cm" svg:x="19.589cm" svg:y="96.065cm">
            <text:p text:style-name="P9"><text:span text:style-name="T7">Pelatiah</text:span></text:p>
            <text:p text:style-name="P9"><text:span text:style-name="T8">1Ch 3: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83" draw:id="id183" draw:layer="layout" svg:width="3.048cm" svg:height="2.54cm" svg:x="23.171cm" svg:y="96.067cm">
            <text:p text:style-name="P9"><text:span text:style-name="T7">Jesaiah</text:span></text:p>
            <text:p text:style-name="P9"><text:span text:style-name="T8">1Ch 3: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184" draw:id="id184" draw:layer="layout" svg:width="3.048cm" svg:height="2.54cm" svg:x="26.79cm" svg:y="96.066cm">
            <text:p text:style-name="P9"><text:span text:style-name="T7">Rephaiah</text:span></text:p>
            <text:p text:style-name="P9"><text:span text:style-name="T8">1Ch 3: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17" xml:id="id193" draw:id="id193" draw:layer="layout" svg:width="3.048cm" svg:height="2.54cm" svg:x="30.372cm" svg:y="96.068cm">
            <text:p text:style-name="P9"><text:span text:style-name="T7">Arnan</text:span></text:p>
            <text:p text:style-name="P9"><text:span text:style-name="T8">1Ch 3: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75" draw:id="id175" draw:layer="layout" svg:width="3.048cm" svg:height="2.54cm" svg:x="37.75cm" svg:y="99.169cm">
            <text:p text:style-name="P9"><text:span text:style-name="T7">Shemaiah</text:span></text:p>
            <text:p text:style-name="P9"><text:span text:style-name="T8">1Ch 3:22</text:span></text:p>
            <text:p text:style-name="P9"><text:span text:style-name="T8">Neh 3:29</text:span><text:span text:style-name="T10">*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81" draw:id="id181" draw:layer="layout" svg:width="3.048cm" svg:height="2.54cm" svg:x="45.048cm" svg:y="103.265cm">
            <text:p text:style-name="P9"><text:span text:style-name="T7">Shaphat</text:span></text:p>
            <text:p text:style-name="P9"><text:span text:style-name="T8">1Ch 3: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76" draw:id="id176" draw:layer="layout" svg:width="3.048cm" svg:height="2.54cm" svg:x="30.549cm" svg:y="103.266cm">
            <text:p text:style-name="P9"><text:span text:style-name="T7">Hattush</text:span></text:p>
            <text:p text:style-name="P9"><text:span text:style-name="T8">1Ch 3:22</text:span></text:p>
            <text:p text:style-name="P9"><text:span text:style-name="T8">Ezr 8:2</text:span><text:span text:style-name="T10">*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80" draw:id="id180" draw:layer="layout" svg:width="3.048cm" svg:height="2.54cm" svg:x="34.131cm" svg:y="103.268cm">
            <text:p text:style-name="P9"><text:span text:style-name="T7">Igeal</text:span></text:p>
            <text:p text:style-name="P9"><text:span text:style-name="T8">1Ch 3: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74" draw:id="id174" draw:layer="layout" svg:width="3.048cm" svg:height="2.54cm" svg:x="37.75cm" svg:y="103.267cm">
            <text:p text:style-name="P9"><text:span text:style-name="T7">Bariah</text:span></text:p>
            <text:p text:style-name="P9"><text:span text:style-name="T8">1Ch 3: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78" draw:id="id178" draw:layer="layout" svg:width="3.048cm" svg:height="2.54cm" svg:x="41.332cm" svg:y="103.269cm">
            <text:p text:style-name="P9"><text:span text:style-name="T7">Neariah</text:span></text:p>
            <text:p text:style-name="P9"><text:span text:style-name="T8">1Ch 3: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82" draw:id="id182" draw:layer="layout" svg:width="3.048cm" svg:height="2.54cm" svg:x="45.057cm" svg:y="107.466cm">
            <text:p text:style-name="P9"><text:span text:style-name="T7">Azrikam</text:span></text:p>
            <text:p text:style-name="P9"><text:span text:style-name="T8">1Ch 3: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77" draw:id="id177" draw:layer="layout" svg:width="3.048cm" svg:height="2.54cm" svg:x="37.759cm" svg:y="107.468cm">
            <text:p text:style-name="P9"><text:span text:style-name="T7">Elioenai</text:span></text:p>
            <text:p text:style-name="P9"><text:span text:style-name="T8">1Ch 3: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86" draw:id="id186" draw:layer="layout" svg:width="3.048cm" svg:height="2.54cm" svg:x="41.341cm" svg:y="107.47cm">
            <text:p text:style-name="P9"><text:span text:style-name="T7">Hezekiah</text:span></text:p>
            <text:p text:style-name="P9"><text:span text:style-name="T8">1Ch 3: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91" draw:id="id191" draw:layer="layout" svg:width="3.048cm" svg:height="2.54cm" svg:x="41.483cm" svg:y="111.966cm">
            <text:p text:style-name="P9"><text:span text:style-name="T7">Johanan</text:span></text:p>
            <text:p text:style-name="P9"><text:span text:style-name="T8">1Ch 3: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87" draw:id="id187" draw:layer="layout" svg:width="3.048cm" svg:height="2.54cm" svg:x="26.984cm" svg:y="111.967cm">
            <text:p text:style-name="P9"><text:span text:style-name="T7">Hodaiah</text:span></text:p>
            <text:p text:style-name="P9"><text:span text:style-name="T8">1Ch 3: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88" draw:id="id188" draw:layer="layout" svg:width="3.048cm" svg:height="2.54cm" svg:x="30.566cm" svg:y="111.969cm">
            <text:p text:style-name="P9"><text:span text:style-name="T7">Eliashib</text:span></text:p>
            <text:p text:style-name="P9"><text:span text:style-name="T8">1Ch 3: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89" draw:id="id189" draw:layer="layout" svg:width="3.048cm" svg:height="2.54cm" svg:x="34.185cm" svg:y="111.968cm">
            <text:p text:style-name="P9"><text:span text:style-name="T7">Pelaiah</text:span></text:p>
            <text:p text:style-name="P9"><text:span text:style-name="T8">1Ch 3: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90" draw:id="id190" draw:layer="layout" svg:width="3.048cm" svg:height="2.54cm" svg:x="37.767cm" svg:y="111.97cm">
            <text:p text:style-name="P9"><text:span text:style-name="T7">Akkub</text:span></text:p>
            <text:p text:style-name="P9"><text:span text:style-name="T8">1Ch 3: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85" draw:id="id185" draw:layer="layout" svg:width="3.048cm" svg:height="2.54cm" svg:x="48.884cm" svg:y="111.967cm">
            <text:p text:style-name="P9"><text:span text:style-name="T7">Anani</text:span></text:p>
            <text:p text:style-name="P9"><text:span text:style-name="T8">1Ch 3: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92" draw:id="id192" draw:layer="layout" svg:width="3.048cm" svg:height="2.54cm" svg:x="45.168cm" svg:y="111.971cm">
            <text:p text:style-name="P9"><text:span text:style-name="T7">Dalaiah</text:span></text:p>
            <text:p text:style-name="P9"><text:span text:style-name="T8">1Ch 3: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9" draw:text-style-name="P37" draw:layer="layout" svg:width="19.397cm" svg:height="2.886cm" svg:x="12.7cm" svg:y="85.618cm">
            <text:p text:style-name="P36"><text:span text:style-name="T20">Governor of Judah after Babylonian captivity.</text:span></text:p>
            <text:p text:style-name="P36"><text:span text:style-name="T22">Mat 1:12</text:span><text:span text:style-name="T23"> &amp; </text:span><text:span text:style-name="T22">Luke 3:27</text:span><text:span text:style-name="T23"> list Zorobabel as the son of Salathiel.</text:span></text:p>
            <text:p text:style-name="P36"><text:span text:style-name="T22">1Ch 3:17-19</text:span><text:span text:style-name="T23"> lists Zerubbabel as the son of Pedaiah (sibling of Salathiel).</text:span></text:p>
            <text:p text:style-name="P36"><text:span text:style-name="T23">We cannot prove with scripture what happened, but the most likely scenario appears</text:span></text:p>
            <text:p text:style-name="P36"><text:span text:style-name="T23">to be that Pedaiah raised a son in the name of his brother Salathiel (</text:span><text:span text:style-name="T22">Deu 25:5</text:span><text:span text:style-name="T23">)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4" draw:text-style-name="P39" draw:layer="layout" svg:width="10.478cm" svg:height="2.981cm" svg:x="47.107cm" svg:y="70.563cm">
            <text:p text:style-name="P38"><text:span text:style-name="T23">First among his siblings to be king of</text:span></text:p>
            <text:p text:style-name="P38"><text:span text:style-name="T23">Judah. Reigned for 3 months in</text:span></text:p>
            <text:p text:style-name="P38"><text:span text:style-name="T23">Jerusalem before being taken to Egypt.</text:span></text:p>
            <text:p text:style-name="P38"><text:span text:style-name="T22">2Ch 36:2</text:span></text:p>
            <text:p text:style-name="P38"><text:span text:style-name="T23"/></text:p>
            <text:p text:style-name="P38"><text:span text:style-name="T23">Not listed in Matthew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5" draw:text-style-name="P41" draw:layer="layout" svg:width="3.369cm" svg:height="10.566cm" svg:x="43.412cm" svg:y="62.927cm">
            <text:p text:style-name="P40"><text:span text:style-name="T23">Made the last king over Judah among his siblings by Nebuchadnezzar king of Babylon. Succeeded by the ruler/governor Gedaliah.</text:span></text:p>
            <text:p text:style-name="P40"><text:span text:style-name="T22">2Ch 36:10</text:span></text:p>
            <text:p text:style-name="P40"><text:span text:style-name="T22">2Ki 25: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6" draw:text-style-name="P41" draw:layer="layout" svg:width="3.369cm" svg:height="11.529cm" svg:x="34.24cm" svg:y="61.947cm">
            <text:p text:style-name="P40"><text:span text:style-name="T23">Made second king of Judah among his siblings by Pharaoh-nechoh king of Egypt. Carried to Babylon after reigning 11yrs in Jerusalem.</text:span></text:p>
            <text:p text:style-name="P40"><text:span text:style-name="T22">2Ch 36:4-6</text:span></text:p>
            <text:p text:style-name="P40"><text:span text:style-name="T23"/></text:p>
            <text:p text:style-name="P40"><text:span text:style-name="T23">Not listed in Matthew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7" draw:text-style-name="P43" draw:layer="layout" svg:width="12.07cm" svg:height="5.059cm" svg:x="25.644cm" svg:y="73.941cm">
            <text:p text:style-name="P42"><text:span text:style-name="T23">Last king of Judah by succession.</text:span></text:p>
            <text:p text:style-name="P42"><text:span text:style-name="T23">Carried away to Babylon after reigning 3</text:span></text:p>
            <text:p text:style-name="P42"><text:span text:style-name="T23">months and 10 days in Jerusalem and replaced</text:span></text:p>
            <text:p text:style-name="P42"><text:span text:style-name="T23">by his uncle Mattaniah/Zedekiah at the hand of</text:span></text:p>
            <text:p text:style-name="P42"><text:span text:style-name="T23">Nebuchadnezzar the king of Babylon.</text:span></text:p>
            <text:p text:style-name="P42"><text:span text:style-name="T22">2Ch 36: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8" draw:text-style-name="P35" draw:layer="layout" svg:width="10.466cm" svg:height="10.457cm" svg:x="35.952cm" svg:y="35.503cm">
            <text:p text:style-name="P34"><text:span text:style-name="T20">Not listed in</text:span></text:p>
            <text:p text:style-name="P34"><text:span text:style-name="T20">Matthew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9" draw:text-style-name="P8" xml:id="id137" draw:id="id137" draw:layer="layout" svg:width="3.048cm" svg:height="2.642cm" svg:x="12.776cm" svg:y="21.683cm">
            <text:p text:style-name="P6"><text:span text:style-name="T3">Maachah</text:span></text:p>
            <text:p text:style-name="P6"><text:span text:style-name="T4">2Ch 11:20</text:span></text:p>
            <text:p text:style-name="P6"><text:span text:style-name="T4">1Ki 15:13</text:span></text:p>
            <text:p text:style-name="P14"><text:span text:style-name="T3">Michaiah</text:span></text:p>
            <text:p text:style-name="P14"><text:span text:style-name="T4">2Ch 13: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" draw:text-style-name="P8" xml:id="id195" draw:id="id195" draw:layer="layout" svg:width="3.048cm" svg:height="2.54cm" svg:x="12.772cm" svg:y="18.484cm">
            <text:p text:style-name="P6"><text:span text:style-name="T3">Uriel</text:span><text:span text:style-name="T13"> of Gibeah</text:span></text:p>
            <text:p text:style-name="P6"><text:span text:style-name="T6">2Ch 13: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0" draw:text-style-name="P39" draw:layer="layout" svg:width="13.786cm" svg:height="2.771cm" svg:x="12.641cm" svg:y="18.399cm">
            <text:p text:style-name="P38"><text:span text:style-name="T23">Since Maachah/Michaian is both the daughter of</text:span></text:p>
            <text:p text:style-name="P38"><text:span text:style-name="T23">Absalom/Abishalom and Uriel of Gibeah and we find no</text:span></text:p>
            <text:p text:style-name="P38"><text:span text:style-name="T23">Uriel in Absalom’s ancestory, we can only conclude that</text:span></text:p>
            <text:p text:style-name="P38"><text:span text:style-name="T23">Uriel is Maachah/Michaiah’s mother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115" draw:id="id115" draw:layer="layout" svg:width="3.048cm" svg:height="2.54cm" svg:x="82.197cm" svg:y="15.116cm">
            <text:p text:style-name="P9"><text:span text:style-name="T7">Jerimoth</text:span></text:p>
            <text:p text:style-name="P9"><text:span text:style-name="T8">2Ch 11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4" draw:text-style-name="P15" xml:id="id196" draw:id="id196" draw:layer="layout" svg:width="3.048cm" svg:height="2.54cm" svg:x="82.2cm" svg:y="19.019cm">
            <text:p text:style-name="P9"><text:span text:style-name="T7">Mahalath</text:span></text:p>
            <text:p text:style-name="P9"><text:span text:style-name="T8">2Ch 11: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1" draw:text-style-name="P43" draw:layer="layout" svg:width="11.43cm" svg:height="2.858cm" svg:x="22.385cm" svg:y="103.106cm">
            <text:p text:style-name="P42"><text:span text:style-name="T23">Probably not the same Hattush as in</text:span></text:p>
            <text:p text:style-name="P42"><text:span text:style-name="T22">Neh 3:10, 10:4, 12:2</text:span><text:span text:style-name="T23"> which is a descendant</text:span></text:p>
            <text:p text:style-name="P42"><text:span text:style-name="T23">of a Levite and listed among the priests twice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0" draw:text-style-name="P41" draw:layer="layout" svg:width="3.296cm" svg:height="6.774cm" svg:x="34.07cm" svg:y="111.875cm">
            <text:p text:style-name="P40"><text:span text:style-name="T23">Could be the same Pelaiah as </text:span><text:span text:style-name="T22">Neh 8:7</text:span><text:span text:style-name="T23"> but probably not </text:span><text:span text:style-name="T22">Neh 10:10</text:span></text:p>
            <text:p text:style-name="P40"><text:span text:style-name="T23">(a Levit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1" draw:text-style-name="P41" draw:layer="layout" svg:width="3.296cm" svg:height="10.01cm" svg:x="37.671cm" svg:y="111.876cm">
            <text:p text:style-name="P40"><text:span text:style-name="T23">Could be the same man as either or both of the following:</text:span></text:p>
            <text:p text:style-name="P40"><text:span text:style-name="T23"/></text:p>
            <text:p text:style-name="P40"><text:span text:style-name="T23">Listed among the porters: </text:span><text:span text:style-name="T22">1Ch 9:17, Ezr 2:42, Neh 11:19, 12:25</text:span><text:span text:style-name="T23">.</text:span></text:p>
            <text:p text:style-name="P40"><text:span text:style-name="T23"/></text:p>
            <text:p text:style-name="P40"><text:span text:style-name="T23">Listed among the Nethinims (servants of the Levites </text:span><text:span text:style-name="T22">Ezr 8:20</text:span><text:span text:style-name="T23">): </text:span><text:span text:style-name="T22">Ezr 2:4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4" draw:text-style-name="P39" draw:layer="layout" svg:width="10.62cm" svg:height="2.807cm" svg:x="12.632cm" svg:y="2.574cm">
            <text:p text:style-name="P38"><text:span text:style-name="T23">Geshur/Geshuri</text:span></text:p>
            <text:p text:style-name="P38"><text:span text:style-name="T23">A region (</text:span><text:span text:style-name="T22">Jos 13:2</text:span><text:span text:style-name="T23">) east of the sea of</text:span></text:p>
            <text:p text:style-name="P38"><text:span text:style-name="T23">Galilee, north of Heshbon (</text:span><text:span text:style-name="T22">Jos 12:5</text:span><text:span text:style-name="T23">) and</text:span></text:p>
            <text:p text:style-name="P38"><text:span text:style-name="T23">a city (</text:span><text:span text:style-name="T22">2Sa 15:8</text:span><text:span text:style-name="T23">, </text:span><text:span text:style-name="T22">1Ch 2:23</text:span><text:span text:style-name="T23">) ruled by Syrians</text:span></text:p>
            <text:p text:style-name="P38"><text:span text:style-name="T23">in the territory given to East Manasseh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35" xml:id="id117" draw:id="id117" draw:layer="layout" svg:width="9.857cm" svg:height="10.877cm" svg:x="50.6cm" svg:y="21.607cm">
            <table:table table:template-name="table1" table:use-first-row-styles="true" table:use-banding-rows-styles="true" table:use-banding-columns-styles="true">
              <table:table-column table:style-name="co1"/>
              <table:table-column table:style-name="co2"/>
              <table:table-column table:style-name="co1"/>
              <table:table-column table:style-name="co3"/>
              <table:table-column table:style-name="co4"/>
              <table:table-row table:style-name="ro1" table:default-cell-style-name="ce14">
                <table:table-cell table:style-name="ce13">
                  <text:p text:style-name="P44"><text:span text:style-name="T24">2Sa</text:span></text:p>
                </table:table-cell>
                <table:table-cell/>
                <table:table-cell table:style-name="ce15">
                  <text:p text:style-name="P44"><text:span text:style-name="T24">1Ch 3</text:span></text:p>
                </table:table-cell>
                <table:table-cell/>
                <table:table-cell table:style-name="ce16">
                  <text:p text:style-name="P44"><text:span text:style-name="T24">1Ch 14</text:span></text:p>
                </table:table-cell>
              </table:table-row>
              <table:table-row table:style-name="ro1" table:default-cell-style-name="ce18">
                <table:table-cell table:style-name="ce17">
                  <text:p text:style-name="P45"><text:span text:style-name="T25">Shammua</text:span></text:p>
                </table:table-cell>
                <table:table-cell/>
                <table:table-cell table:style-name="ce19">
                  <text:p text:style-name="P28"><text:span text:style-name="T16">Shimea</text:span></text:p>
                </table:table-cell>
                <table:table-cell/>
                <table:table-cell table:style-name="ce20">
                  <text:p text:style-name="P45"><text:span text:style-name="T25">Shammua</text:span></text:p>
                </table:table-cell>
              </table:table-row>
              <table:table-row table:style-name="ro1" table:default-cell-style-name="ce18">
                <table:table-cell table:style-name="ce17">
                  <text:p text:style-name="P45"><text:span text:style-name="T25">Shobab</text:span></text:p>
                </table:table-cell>
                <table:table-cell/>
                <table:table-cell table:style-name="ce21">
                  <text:p text:style-name="P46"><text:span text:style-name="T26">Shobab</text:span></text:p>
                </table:table-cell>
                <table:table-cell/>
                <table:table-cell table:style-name="ce20">
                  <text:p text:style-name="P45"><text:span text:style-name="T25">Shobab</text:span></text:p>
                </table:table-cell>
              </table:table-row>
              <table:table-row table:style-name="ro1" table:default-cell-style-name="ce18">
                <table:table-cell table:style-name="ce17">
                  <text:p text:style-name="P45"><text:span text:style-name="T25">Nathan</text:span></text:p>
                </table:table-cell>
                <table:table-cell/>
                <table:table-cell table:style-name="ce21">
                  <text:p text:style-name="P46"><text:span text:style-name="T26">Nathan</text:span></text:p>
                </table:table-cell>
                <table:table-cell/>
                <table:table-cell table:style-name="ce20">
                  <text:p text:style-name="P45"><text:span text:style-name="T25">Nathan</text:span></text:p>
                </table:table-cell>
              </table:table-row>
              <table:table-row table:style-name="ro1" table:default-cell-style-name="ce18">
                <table:table-cell table:style-name="ce17">
                  <text:p text:style-name="P45"><text:span text:style-name="T25">Solomon</text:span></text:p>
                </table:table-cell>
                <table:table-cell/>
                <table:table-cell table:style-name="ce21">
                  <text:p text:style-name="P46"><text:span text:style-name="T26">Solomon</text:span></text:p>
                </table:table-cell>
                <table:table-cell/>
                <table:table-cell table:style-name="ce20">
                  <text:p text:style-name="P45"><text:span text:style-name="T25">Solomon</text:span></text:p>
                </table:table-cell>
              </table:table-row>
              <table:table-row table:style-name="ro1" table:default-cell-style-name="ce18">
                <table:table-cell table:style-name="ce17">
                  <text:p text:style-name="P45"><text:span text:style-name="T25">Ibhar</text:span></text:p>
                </table:table-cell>
                <table:table-cell/>
                <table:table-cell table:style-name="ce21">
                  <text:p text:style-name="P46"><text:span text:style-name="T26">Ibhar</text:span></text:p>
                </table:table-cell>
                <table:table-cell/>
                <table:table-cell table:style-name="ce20">
                  <text:p text:style-name="P45"><text:span text:style-name="T25">Ibhar</text:span></text:p>
                </table:table-cell>
              </table:table-row>
              <table:table-row table:style-name="ro1" table:default-cell-style-name="ce18">
                <table:table-cell table:style-name="ce17">
                  <text:p text:style-name="P45"><text:span text:style-name="T25">Elishua</text:span></text:p>
                </table:table-cell>
                <table:table-cell/>
                <table:table-cell table:style-name="ce19">
                  <text:p text:style-name="P28"><text:span text:style-name="T16">Elishama</text:span></text:p>
                </table:table-cell>
                <table:table-cell/>
                <table:table-cell table:style-name="ce20">
                  <text:p text:style-name="P45"><text:span text:style-name="T25">Elishua</text:span></text:p>
                </table:table-cell>
              </table:table-row>
              <table:table-row table:style-name="ro1" table:default-cell-style-name="ce18">
                <table:table-cell table:style-name="ce17"/>
                <table:table-cell/>
                <table:table-cell table:style-name="ce22">
                  <text:p text:style-name="P45"><text:span text:style-name="T25">Eliphelet</text:span></text:p>
                </table:table-cell>
                <table:table-cell/>
                <table:table-cell table:style-name="ce23">
                  <text:p text:style-name="P28"><text:span text:style-name="T16">Elpalet</text:span></text:p>
                </table:table-cell>
              </table:table-row>
              <table:table-row table:style-name="ro1" table:default-cell-style-name="ce18">
                <table:table-cell table:style-name="ce17"/>
                <table:table-cell/>
                <table:table-cell table:style-name="ce22">
                  <text:p text:style-name="P45"><text:span text:style-name="T25">Nogah</text:span></text:p>
                </table:table-cell>
                <table:table-cell/>
                <table:table-cell table:style-name="ce20">
                  <text:p text:style-name="P45"><text:span text:style-name="T25">Nogah</text:span></text:p>
                </table:table-cell>
              </table:table-row>
              <table:table-row table:style-name="ro1" table:default-cell-style-name="ce18">
                <table:table-cell table:style-name="ce17"/>
                <table:table-cell/>
                <table:table-cell table:style-name="ce22">
                  <text:p text:style-name="P45"><text:span text:style-name="T25">Nepheg</text:span></text:p>
                </table:table-cell>
                <table:table-cell/>
                <table:table-cell table:style-name="ce20">
                  <text:p text:style-name="P45"><text:span text:style-name="T25">Nepheg</text:span></text:p>
                </table:table-cell>
              </table:table-row>
              <table:table-row table:style-name="ro1" table:default-cell-style-name="ce18">
                <table:table-cell table:style-name="ce17">
                  <text:p text:style-name="P45"><text:span text:style-name="T25">Japhia</text:span></text:p>
                </table:table-cell>
                <table:table-cell/>
                <table:table-cell table:style-name="ce22">
                  <text:p text:style-name="P45"><text:span text:style-name="T25">Japhia</text:span></text:p>
                </table:table-cell>
                <table:table-cell/>
                <table:table-cell table:style-name="ce20">
                  <text:p text:style-name="P45"><text:span text:style-name="T25">Japhia</text:span></text:p>
                </table:table-cell>
              </table:table-row>
              <table:table-row table:style-name="ro1" table:default-cell-style-name="ce18">
                <table:table-cell table:style-name="ce17">
                  <text:p text:style-name="P45"><text:span text:style-name="T25">Elishama</text:span></text:p>
                </table:table-cell>
                <table:table-cell/>
                <table:table-cell table:style-name="ce22">
                  <text:p text:style-name="P45"><text:span text:style-name="T25">Elishama</text:span></text:p>
                </table:table-cell>
                <table:table-cell/>
                <table:table-cell table:style-name="ce20">
                  <text:p text:style-name="P45"><text:span text:style-name="T25">Elishama</text:span></text:p>
                </table:table-cell>
              </table:table-row>
              <table:table-row table:style-name="ro1" table:default-cell-style-name="ce18">
                <table:table-cell table:style-name="ce17">
                  <text:p text:style-name="P45"><text:span text:style-name="T25">Eliada</text:span></text:p>
                </table:table-cell>
                <table:table-cell/>
                <table:table-cell table:style-name="ce22">
                  <text:p text:style-name="P45"><text:span text:style-name="T25">Eliada</text:span></text:p>
                </table:table-cell>
                <table:table-cell/>
                <table:table-cell table:style-name="ce23">
                  <text:p text:style-name="P28"><text:span text:style-name="T16">Beeliada</text:span></text:p>
                </table:table-cell>
              </table:table-row>
              <table:table-row table:style-name="ro1" table:default-cell-style-name="ce25">
                <table:table-cell table:style-name="ce24">
                  <text:p text:style-name="P45"><text:span text:style-name="T25">Eliphalet</text:span></text:p>
                </table:table-cell>
                <table:table-cell/>
                <table:table-cell table:style-name="ce26">
                  <text:p text:style-name="P28"><text:span text:style-name="T16">Eliphelet</text:span></text:p>
                </table:table-cell>
                <table:table-cell/>
                <table:table-cell table:style-name="ce27">
                  <text:p text:style-name="P45"><text:span text:style-name="T25">Eliphalet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36" draw:text-style-name="P47" draw:layer="layout" svg:width="19.346cm" svg:height="8.506cm" svg:x="47.22cm" svg:y="49.705cm">
            <draw:text-box>
              <text:p><text:span text:style-name="T27">1 </text:span><text:span text:style-name="T28">Chronicles</text:span><text:span text:style-name="T27"> 3</text:span></text:p>
            </draw:text-box>
          </draw:frame>
          <draw:custom-shape draw:style-name="gr37" draw:text-style-name="P11" xml:id="id103" draw:id="id103" draw:layer="layout" svg:width="3.048cm" svg:height="3.099cm" svg:x="42.695cm" svg:y="36.119cm">
            <text:p text:style-name="P9"><text:span text:style-name="T9">Elder</text:span><text:span text:style-name="T7"> Ahaziah</text:span></text:p>
            <text:p text:style-name="P9"><text:span text:style-name="T19">2Ch 22:2-5,9</text:span></text:p>
            <text:p text:style-name="P9"><text:span text:style-name="T19">2Ki 9:2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1" xml:id="id99" draw:id="id99" draw:layer="layout" svg:width="3.048cm" svg:height="2.54cm" svg:x="38.084cm" svg:y="74.501cm">
            <text:p text:style-name="P9"><text:span text:style-name="T7">Younger Jehoiachin</text:span></text:p>
            <text:p text:style-name="P9"><text:span text:style-name="T19">2Ki 24:12</text:span></text:p>
            <text:p text:style-name="P9"><text:span text:style-name="T19">2Ch 36:9,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8" draw:text-style-name="P41" draw:layer="layout" svg:width="3.369cm" svg:height="4.674cm" svg:x="37.926cm" svg:y="74.326cm">
            <text:p text:style-name="P40"><text:span text:style-name="T23">Not listed in Matthew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BlackChancery" svg:font-family="BlackChancery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25cm" fo:padding-bottom="0.025cm" fo:padding-left="0.025cm" fo:padding-right="0.0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1cm" fo:margin-bottom="1cm" fo:margin-left="1cm" fo:margin-right="1cm" fo:page-width="88.9cm" fo:page-height="124.46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3T15:36:57.051981200</meta:creation-date>
    <meta:editing-cycles>278</meta:editing-cycles>
    <meta:editing-duration>PT9H50M29S</meta:editing-duration>
    <dc:title>1 Chronicles 3</dc:title>
    <dc:date>2026-07-11T12:32:06.273827170</dc:date>
    <meta:generator>LibreOffice/26.2.4.2$Linux_X86_64 LibreOffice_project/64a984c51f4702dbd3710b13428c673a2f1292e7</meta:generator>
    <meta:document-statistic meta:object-count="426"/>
  </office:meta>
</office:document-meta>
</file>