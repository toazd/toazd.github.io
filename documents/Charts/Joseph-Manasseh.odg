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2.35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042cm" fo:min-width="2.402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51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7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8" style:family="graphic" style:parent-style-name="standard">
      <style:graphic-properties draw:fill="none" loext:fill-use-slide-background="fals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31cm" fo:min-width="2.15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56cm" fo:min-width="2.32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76cm" fo:min-width="2.289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31cm" fo:min-width="2.32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31cm" fo:min-width="2.152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84cm" fo:min-width="2.40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88cm" fo:min-width="2.211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84cm" fo:min-width="2.14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83cm" fo:min-width="1.886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22cm" fo:min-width="2.666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84cm" fo:min-width="3.156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09cm" fo:min-width="2.177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76cm" fo:min-width="2.238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09cm" fo:min-width="2.186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00" draw:textarea-horizontal-align="justify" draw:textarea-vertical-align="middle" draw:auto-grow-height="false" fo:min-height="1.722cm" fo:min-width="2.13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00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184cm" fo:min-width="2.47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953cm" fo:min-width="2.297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631cm" fo:min-width="2.295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584cm" fo:min-width="2.156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00" draw:textarea-horizontal-align="justify" draw:textarea-vertical-align="middle" draw:auto-grow-height="false" fo:min-height="1.539cm" fo:min-width="3.677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00" draw:textarea-horizontal-align="justify" draw:textarea-vertical-align="middle" draw:auto-grow-height="false" fo:min-height="1.184cm" fo:min-width="2.318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00" draw:textarea-horizontal-align="justify" draw:textarea-vertical-align="middle" draw:auto-grow-height="false" fo:min-height="1.722cm" fo:min-width="2.692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width="0.1cm" svg:stroke-color="#ff0000" draw:marker-start-width="0.2cm" draw:marker-end-width="0.2cm" draw:fill="none" draw:textarea-vertical-align="middle" fo:padding-top="0.174cm" fo:padding-bottom="0.174cm" fo:padding-left="0.299cm" fo:padding-right="0.299cm" loext:decorative="false"/>
    </style:style>
    <style:style style:name="gr35" style:family="graphic" style:parent-style-name="objectwithoutfill">
      <style:graphic-properties svg:stroke-width="0.1cm" svg:stroke-color="#ff0000" draw:marker-start-width="0.19cm" draw:marker-end-width="0.19cm" draw:fill="none" draw:textarea-vertical-align="middle" fo:padding-top="0.174cm" fo:padding-bottom="0.174cm" fo:padding-left="0.299cm" fo:padding-right="0.299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631cm" fo:min-width="2.143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00" draw:textarea-horizontal-align="justify" draw:textarea-vertical-align="middle" draw:auto-grow-height="false" fo:min-height="1.722cm" fo:min-width="2.184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00" draw:textarea-horizontal-align="justify" draw:textarea-vertical-align="middle" draw:auto-grow-height="false" fo:min-height="1.631cm" fo:min-width="2.6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00" draw:textarea-horizontal-align="justify" draw:textarea-vertical-align="middle" draw:auto-grow-height="false" fo:min-height="1.173cm" fo:min-width="2.19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00" draw:textarea-horizontal-align="justify" draw:textarea-vertical-align="middle" draw:auto-grow-height="false" fo:min-height="1.243cm" fo:min-width="2.236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319cm" fo:min-width="2.323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423cm" fo:min-width="2.66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264cm" fo:min-width="2.081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676cm" fo:min-width="2.137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356cm" fo:min-width="2.173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184cm" fo:min-width="2.77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184cm" fo:min-width="1.886cm" style:writing-mode="lr-tb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184cm" fo:min-width="2.52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ffd7d7" draw:textarea-horizontal-align="justify" draw:textarea-vertical-align="middle" draw:auto-grow-height="false" fo:min-height="1.184cm" fo:min-width="1.917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184cm" fo:min-width="1.784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184cm" fo:min-width="1.581cm" style:writing-mode="lr-tb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184cm" fo:min-width="1.937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492cm" fo:min-width="2.157cm" style:writing-mode="lr-tb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184cm" fo:min-width="1.835cm" style:writing-mode="lr-tb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631cm" fo:min-width="2.473cm" style:writing-mode="lr-tb" loext:decorative="false"/>
      <style:paragraph-properties style:writing-mode="lr-tb"/>
    </style:style>
    <style:style style:name="gr56" style:family="graphic">
      <style:graphic-properties style:writing-mode="lr-tb" loext:decorative="false"/>
    </style:style>
    <style:style style:name="gr57" style:family="graphic" style:parent-style-name="objectwithoutfill">
      <style:graphic-properties svg:stroke-width="0.028cm" svg:stroke-color="#ff0000" draw:marker-start-width="0.252cm" draw:marker-end-width="0.252cm" draw:fill="none" draw:textarea-vertical-align="middle" fo:padding-top="0.138cm" fo:padding-bottom="0.138cm" fo:padding-left="0.263cm" fo:padding-right="0.263cm" loext:decorative="false"/>
    </style:style>
    <style:style style:name="gr58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1" style:family="graphic" style:parent-style-name="objectwithoutfill">
      <style:graphic-properties svg:stroke-width="0.028cm" svg:stroke-color="#ff8000" draw:marker-start-width="0.252cm" draw:marker-end-width="0.252cm" draw:fill="none" draw:textarea-vertical-align="middle" fo:padding-top="0.138cm" fo:padding-bottom="0.138cm" fo:padding-left="0.263cm" fo:padding-right="0.263cm" loext:decorative="false"/>
    </style:style>
    <style:style style:name="gr62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184cm" fo:min-width="2.39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ffd7d7" draw:textarea-horizontal-align="justify" draw:textarea-vertical-align="middle" draw:auto-grow-height="false" fo:min-height="1.184cm" fo:min-width="2.20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center" draw:textarea-vertical-align="top" draw:auto-grow-height="false" fo:min-height="27.338cm" fo:min-width="11.849cm" fo:padding-top="0.142cm" fo:padding-bottom="0.142cm" fo:padding-left="0.267cm" fo:padding-right="0.26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9" style:family="graphic" style:parent-style-name="standard">
      <style:graphic-properties draw:fill-color="#ffd7d7" draw:textarea-horizontal-align="justify" draw:textarea-vertical-align="middle" draw:auto-grow-height="false" fo:min-height="1.184cm" fo:min-width="1.886cm" style:writing-mode="lr-tb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184cm" fo:min-width="2.216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16.544cm" fo:min-width="35.979cm" fo:padding-top="0.142cm" fo:padding-bottom="0.142cm" fo:padding-left="0.267cm" fo:padding-right="0.267cm" style:writing-mode="lr-tb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184cm" fo:min-width="2.521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10.511cm" fo:min-width="10.578cm" fo:padding-top="0.142cm" fo:padding-bottom="0.142cm" fo:padding-left="0.267cm" fo:padding-right="0.267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757cm" fo:min-width="2.138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ffff00" draw:textarea-horizontal-align="justify" draw:textarea-vertical-align="middle" draw:auto-grow-height="false" fo:min-height="4.465cm" fo:min-width="3.351cm" style:writing-mode="lr-tb" loext:decorative="false"/>
      <style:paragraph-properties style:writing-mode="lr-tb"/>
    </style:style>
    <style:style style:name="gr76" style:family="graphic" style:parent-style-name="standard">
      <style:graphic-properties draw:fill-color="#ffd7d7" draw:textarea-horizontal-align="justify" draw:textarea-vertical-align="middle" draw:auto-grow-height="false" fo:min-height="1.584cm" fo:min-width="2.35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12cm" fo:min-width="18.232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5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align="center" fo:text-indent="0cm" style:writing-mode="lr-tb"/>
      <style:text-properties fo:font-size="12pt"/>
    </style:style>
    <style:style style:name="P10" style:family="paragraph">
      <loext:graphic-properties draw:fill-color="#ffd7d7"/>
      <style:paragraph-properties fo:text-align="center" style:writing-mode="lr-tb"/>
      <style:text-properties fo:font-size="12pt"/>
    </style:style>
    <style:style style:name="P11" style:family="paragraph">
      <style:paragraph-properties fo:margin-left="0cm" fo:margin-right="0cm" fo:text-align="center" fo:text-indent="0cm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2" style:family="paragraph">
      <loext:graphic-properties draw:fill="solid" draw:fill-color="#999999"/>
      <style:paragraph-properties fo:margin-left="0cm" fo:margin-right="0cm" fo:text-align="center" fo:text-indent="0cm" style:writing-mode="lr-tb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3" style:family="paragraph">
      <loext:graphic-properties draw:fill="solid" draw:fill-color="#999999"/>
      <style:paragraph-properties fo:text-align="center" style:writing-mode="lr-tb"/>
      <style:text-properties fo:font-size="12pt"/>
    </style:style>
    <style:style style:name="P14" style:family="paragraph">
      <style:paragraph-properties fo:text-align="center"/>
      <style:text-properties fo:color="#000000" loext:opacity="100%"/>
    </style:style>
    <style:style style:name="P15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P16" style:family="paragraph">
      <style:paragraph-properties fo:text-align="center"/>
      <style:text-properties fo:color="#000000" loext:opacity="100%" style:font-name="BlackChancery" fo:font-size="96pt" style:font-size-asian="96pt" style:font-size-complex="96pt"/>
    </style:style>
    <style:style style:name="P17" style:family="paragraph">
      <loext:graphic-properties draw:fill="none"/>
      <style:paragraph-properties fo:text-align="center" style:writing-mode="lr-tb"/>
      <style:text-properties fo:color="#000000" loext:opacity="100%" style:font-name="BlackChancery" fo:font-size="96pt" style:font-size-asian="96pt" style:font-size-complex="96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none" fo:font-weight="bold" style:font-weight-asian="bold" style:font-weight-complex="bold"/>
    </style:style>
    <style:style style:name="T5" style:family="text">
      <style:text-properties fo:font-size="12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6pt" style:font-size-asian="16pt" style:font-size-complex="16pt"/>
    </style:style>
    <style:style style:name="T9" style:family="text">
      <style:text-properties fo:color="#ffffff" loext:opacity="100%" style:text-position="super 58%" fo:font-size="16pt" style:font-size-asian="16pt" style:font-size-complex="16pt"/>
    </style:style>
    <style:style style:name="T10" style:family="text">
      <style:text-properties fo:color="#ff8000" loext:opacity="100%" fo:font-size="16pt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#fff5ce" style:font-size-asian="16pt" style:font-size-complex="1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iberation Sans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7" style:family="text"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T18" style:family="text">
      <style:text-properties fo:font-size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000000" loext:opacity="100%" style:font-name="Gabriela Nerd Font1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21" style:family="text">
      <style:text-properties fo:color="#000000" loext:opacity="100%" style:font-name="Gabriela Nerd Font1" fo:font-size="10pt" style:letter-kerning="true" style:font-name-asian="Microsoft YaHei" style:font-size-asian="10pt" style:font-name-complex="Arial" style:font-size-complex="10pt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Gabriela Nerd Font" fo:font-size="80pt" style:font-size-asian="80pt" style:font-size-complex="80pt"/>
    </style:style>
    <style:style style:name="T24" style:family="text">
      <style:text-properties fo:color="#000000" loext:opacity="100%" style:font-name="BlackChancery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48cm" svg:height="2.54cm" svg:x="52.275cm" svg:y="2.322cm">
          <text:p text:style-name="P1"><text:span text:style-name="T1">Joseph</text:span></text:p>
          <text:p text:style-name="P1"><text:span text:style-name="T2">1Ch 2:2</text:span></text:p>
          <text:p text:style-name="P1"><text:span text:style-name="T2">Gen 30:23,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" draw:id="id1" draw:layer="layout" svg:width="3.099cm" svg:height="2.54cm" svg:x="52.26cm" svg:y="5.623cm">
          <text:p text:style-name="P1"><text:span text:style-name="T3">Manasseh</text:span></text:p>
          <text:p text:style-name="P1"><text:span text:style-name="T2">Num 26:28,29</text:span></text:p>
          <text:p text:style-name="P1"><text:span text:style-name="T2">Jos 1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5.623cm" svg:x2="53.799cm" svg:y2="4.862cm" draw:start-shape="id1" draw:start-glue-point="0" draw:end-shape="id2" draw:end-glue-point="2" svg:d="M53809 5623c0-570-10-190-10-761" svg:viewBox="0 0 11 762">
          <text:p/>
        </draw:connector>
        <draw:custom-shape draw:style-name="gr2" draw:text-style-name="P2" xml:id="id3" draw:id="id3" draw:layer="layout" svg:width="3.099cm" svg:height="2.54cm" svg:x="52.26cm" svg:y="9.324cm">
          <text:p text:style-name="P1"><text:span text:style-name="T3">Machir</text:span></text:p>
          <text:p text:style-name="P1"><text:span text:style-name="T2">Num 26:28,29</text:span></text:p>
          <text:p text:style-name="P1"><text:span text:style-name="T2">Jos 1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9.324cm" svg:x2="51.609cm" svg:y2="6.893cm" draw:start-shape="id3" draw:start-glue-point="0" draw:end-shape="id4" draw:end-glue-point="0" svg:d="M53809 9324c0-1785-2200-570-2200-2431" svg:viewBox="0 0 2201 2432">
          <text:p/>
        </draw:connector>
        <draw:custom-shape draw:style-name="gr2" draw:text-style-name="P2" xml:id="id5" draw:id="id5" draw:layer="layout" svg:width="3.099cm" svg:height="2.54cm" svg:x="52.26cm" svg:y="13.025cm">
          <text:p text:style-name="P1"><text:span text:style-name="T4">Gilead</text:span></text:p>
          <text:p text:style-name="P1"><text:span text:style-name="T2">Num 26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11.864cm" svg:x2="53.809cm" svg:y2="13.025cm" draw:start-shape="id3" draw:start-glue-point="2" draw:end-shape="id5" draw:end-glue-point="0" svg:d="M53809 11864v1161" svg:viewBox="0 0 1 1162">
          <text:p/>
        </draw:connector>
        <draw:custom-shape draw:style-name="gr2" draw:text-style-name="P2" xml:id="id6" draw:id="id6" draw:layer="layout" svg:width="3.099cm" svg:height="2.54cm" svg:x="52.26cm" svg:y="17.126cm">
          <text:p text:style-name="P1"><text:span text:style-name="T4">Jeezer</text:span></text:p>
          <text:p text:style-name="P1"><text:span text:style-name="T2">Num 26:30</text:span></text:p>
          <text:p text:style-name="P4"><text:span text:style-name="T5">Abiezer</text:span></text:p>
          <text:p text:style-name="P4"><text:span text:style-name="T6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7" draw:id="id7" draw:layer="layout" svg:width="3.099cm" svg:height="2.54cm" svg:x="56.26cm" svg:y="17.127cm">
          <text:p text:style-name="P1"><text:span text:style-name="T4">Helek</text:span></text:p>
          <text:p text:style-name="P1"><text:span text:style-name="T2">Num 26:30</text:span></text:p>
          <text:p text:style-name="P1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1" draw:id="id11" draw:layer="layout" svg:width="3.099cm" svg:height="2.54cm" svg:x="60.26cm" svg:y="17.127cm">
          <text:p text:style-name="P1"><text:span text:style-name="T4">Asriel</text:span></text:p>
          <text:p text:style-name="P1"><text:span text:style-name="T2">Num 26:31</text:span></text:p>
          <text:p text:style-name="P4"><text:span text:style-name="T2">Jos 17:2</text:span></text:p>
          <text:p text:style-name="P1"><text:span text:style-name="T7">Ashriel</text:span></text:p>
          <text:p text:style-name="P1"><text:span text:style-name="T2">1Ch 7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2" draw:id="id12" draw:layer="layout" svg:width="3.099cm" svg:height="2.54cm" svg:x="64.26cm" svg:y="17.128cm">
          <text:p text:style-name="P1"><text:span text:style-name="T4">Shechem</text:span></text:p>
          <text:p text:style-name="P1"><text:span text:style-name="T2">Num 26:31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3" draw:id="id13" draw:layer="layout" svg:width="3.099cm" svg:height="2.54cm" svg:x="68.86cm" svg:y="17.128cm">
          <text:p text:style-name="P1"><text:span text:style-name="T4">Shemida</text:span></text:p>
          <text:p text:style-name="P1"><text:span text:style-name="T2">Num 26:32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8" draw:id="id8" draw:layer="layout" svg:width="3.099cm" svg:height="2.54cm" svg:x="72.86cm" svg:y="17.129cm">
          <text:p text:style-name="P1"><text:span text:style-name="T4">Hepher</text:span></text:p>
          <text:p text:style-name="P1"><text:span text:style-name="T2">Num 26:32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2" xml:id="id9" draw:id="id9" draw:layer="layout" svg:width="3.15cm" svg:height="2.54cm" svg:x="72.86cm" svg:y="21.03cm">
          <text:p text:style-name="P1"><text:span text:style-name="T4">Zelophehad</text:span></text:p>
          <text:p text:style-name="P1"><text:span text:style-name="T2">Num 26:33</text:span></text:p>
          <text:p text:style-name="P1"><text:span text:style-name="T2">Jos 17:3</text:span></text:p>
          <text:p text:style-name="P1"><text:span text:style-name="T2">Num 2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0" draw:id="id10" draw:layer="layout" svg:width="3.099cm" svg:height="2.54cm" svg:x="64.888cm" svg:y="25.203cm">
          <text:p text:style-name="P1"><text:span text:style-name="T4">Mahl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4" draw:id="id14" draw:layer="layout" svg:width="3.099cm" svg:height="2.54cm" svg:x="68.888cm" svg:y="25.203cm">
          <text:p text:style-name="P1"><text:span text:style-name="T4">No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7" draw:id="id17" draw:layer="layout" svg:width="3.099cm" svg:height="2.54cm" svg:x="72.888cm" svg:y="25.204cm">
          <text:p text:style-name="P1"><text:span text:style-name="T4">Hogl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6" draw:id="id16" draw:layer="layout" svg:width="3.099cm" svg:height="2.54cm" svg:x="77.488cm" svg:y="25.204cm">
          <text:p text:style-name="P1"><text:span text:style-name="T4">Milc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5" draw:id="id15" draw:layer="layout" svg:width="3.099cm" svg:height="2.54cm" svg:x="81.488cm" svg:y="25.205cm">
          <text:p text:style-name="P1"><text:span text:style-name="T4">Tirz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17.126cm" svg:x2="53.809cm" svg:y2="15.565cm" draw:start-shape="id6" draw:start-glue-point="0" draw:end-shape="id5" draw:end-glue-point="2" svg:d="M53809 17126v-1561" svg:viewBox="0 0 1 1562">
          <text:p/>
        </draw:connector>
        <draw:connector draw:style-name="gr3" draw:text-style-name="P3" draw:layer="layout" draw:type="curve" svg:x1="53.809cm" svg:y1="15.565cm" svg:x2="57.809cm" svg:y2="17.127cm" draw:start-shape="id5" draw:start-glue-point="2" draw:end-shape="id7" draw:end-glue-point="0" svg:d="M53809 15565c0 1173 4000 392 4000 1562" svg:viewBox="0 0 4001 1563">
          <text:p/>
        </draw:connector>
        <draw:connector draw:style-name="gr3" draw:text-style-name="P3" draw:layer="layout" draw:type="curve" svg:x1="74.409cm" svg:y1="19.669cm" svg:x2="74.435cm" svg:y2="21.03cm" draw:start-shape="id8" draw:start-glue-point="2" draw:end-shape="id9" draw:end-glue-point="0" svg:d="M74409 19669c0 1021 26 341 26 1361" svg:viewBox="0 0 27 1362">
          <text:p/>
        </draw:connector>
        <draw:connector draw:style-name="gr3" draw:text-style-name="P3" draw:layer="layout" draw:type="curve" svg:x1="74.435cm" svg:y1="23.57cm" svg:x2="66.437cm" svg:y2="25.203cm" draw:start-shape="id9" draw:start-glue-point="2" draw:end-shape="id10" draw:end-glue-point="0" svg:d="M74435 23570c0 1225-7998 409-7998 1633" svg:viewBox="0 0 7999 1634">
          <text:p/>
        </draw:connector>
        <draw:connector draw:style-name="gr3" draw:text-style-name="P3" draw:layer="layout" draw:type="curve" svg:x1="53.809cm" svg:y1="15.565cm" svg:x2="61.809cm" svg:y2="17.127cm" draw:start-shape="id5" draw:start-glue-point="2" draw:end-shape="id11" draw:end-glue-point="0" svg:d="M53809 15565c0 1173 8000 392 8000 1562" svg:viewBox="0 0 8001 1563">
          <text:p/>
        </draw:connector>
        <draw:connector draw:style-name="gr3" draw:text-style-name="P3" draw:layer="layout" draw:type="curve" svg:x1="53.809cm" svg:y1="15.565cm" svg:x2="65.809cm" svg:y2="17.128cm" draw:start-shape="id5" draw:start-glue-point="2" draw:end-shape="id12" draw:end-glue-point="0" svg:d="M53809 15565c0 1173 12000 392 12000 1563" svg:viewBox="0 0 12001 1564">
          <text:p/>
        </draw:connector>
        <draw:connector draw:style-name="gr3" draw:text-style-name="P3" draw:layer="layout" draw:type="curve" svg:x1="53.809cm" svg:y1="15.565cm" svg:x2="70.409cm" svg:y2="17.128cm" draw:start-shape="id5" draw:start-glue-point="2" draw:end-shape="id13" draw:end-glue-point="0" svg:d="M53809 15565c0 1173 16600 392 16600 1563" svg:viewBox="0 0 16601 1564">
          <text:p/>
        </draw:connector>
        <draw:connector draw:style-name="gr3" draw:text-style-name="P3" draw:layer="layout" draw:type="curve" svg:x1="53.809cm" svg:y1="15.565cm" svg:x2="74.409cm" svg:y2="17.129cm" draw:start-shape="id5" draw:start-glue-point="2" draw:end-shape="id8" draw:end-glue-point="0" svg:d="M53809 15565c0 1174 20600 393 20600 1564" svg:viewBox="0 0 20601 1565">
          <text:p/>
        </draw:connector>
        <draw:connector draw:style-name="gr3" draw:text-style-name="P3" draw:layer="layout" draw:type="curve" svg:x1="40.493cm" svg:y1="5.561cm" svg:x2="40.493cm" svg:y2="6.222cm" svg:d="M40493 5561v661" svg:viewBox="0 0 1 662">
          <text:p/>
        </draw:connector>
        <draw:connector draw:style-name="gr3" draw:text-style-name="P3" draw:layer="layout" draw:type="curve" svg:x1="40.793cm" svg:y1="5.562cm" svg:x2="40.793cm" svg:y2="6.223cm" svg:d="M40793 5562v661" svg:viewBox="0 0 1 662">
          <text:p/>
        </draw:connector>
        <draw:connector draw:style-name="gr3" draw:text-style-name="P3" draw:layer="layout" draw:type="curve" svg:x1="41.093cm" svg:y1="5.562cm" svg:x2="41.093cm" svg:y2="6.223cm" svg:d="M41093 5562v661" svg:viewBox="0 0 1 662">
          <text:p/>
        </draw:connector>
        <draw:connector draw:style-name="gr3" draw:text-style-name="P3" draw:layer="layout" draw:type="curve" svg:x1="41.393cm" svg:y1="5.562cm" svg:x2="41.393cm" svg:y2="6.223cm" svg:d="M41393 5562v661" svg:viewBox="0 0 1 662">
          <text:p/>
        </draw:connector>
        <draw:connector draw:style-name="gr3" draw:text-style-name="P3" draw:layer="layout" draw:type="curve" svg:x1="74.435cm" svg:y1="23.57cm" svg:x2="70.437cm" svg:y2="25.203cm" draw:start-shape="id9" draw:start-glue-point="2" draw:end-shape="id14" draw:end-glue-point="0" svg:d="M74435 23570c0 1225-3998 409-3998 1633" svg:viewBox="0 0 3999 1634">
          <text:p/>
        </draw:connector>
        <draw:connector draw:style-name="gr3" draw:text-style-name="P3" draw:layer="layout" draw:type="curve" svg:x1="74.435cm" svg:y1="23.57cm" svg:x2="83.037cm" svg:y2="25.205cm" draw:start-shape="id9" draw:start-glue-point="2" draw:end-shape="id15" draw:end-glue-point="0" svg:d="M74435 23570c0 1227 8602 410 8602 1635" svg:viewBox="0 0 8603 1636">
          <text:p/>
        </draw:connector>
        <draw:connector draw:style-name="gr3" draw:text-style-name="P3" draw:layer="layout" draw:type="curve" svg:x1="74.435cm" svg:y1="23.57cm" svg:x2="79.037cm" svg:y2="25.204cm" draw:start-shape="id9" draw:start-glue-point="2" draw:end-shape="id16" draw:end-glue-point="0" svg:d="M74435 23570c0 1227 4602 410 4602 1634" svg:viewBox="0 0 4603 1635">
          <text:p/>
        </draw:connector>
        <draw:connector draw:style-name="gr3" draw:text-style-name="P3" draw:layer="layout" draw:type="curve" svg:x1="74.435cm" svg:y1="23.57cm" svg:x2="74.437cm" svg:y2="25.204cm" draw:start-shape="id9" draw:start-glue-point="2" draw:end-shape="id17" draw:end-glue-point="0" svg:d="M74435 23570c0 1227 2 410 2 1634" svg:viewBox="0 0 3 1635">
          <text:p/>
        </draw:connector>
        <draw:connector draw:style-name="gr3" draw:text-style-name="P3" draw:layer="layout" draw:type="curve" svg:x1="41.993cm" svg:y1="5.561cm" svg:x2="41.993cm" svg:y2="6.222cm" svg:d="M41993 5561v661" svg:viewBox="0 0 1 662">
          <text:p/>
        </draw:connector>
        <draw:connector draw:style-name="gr3" draw:text-style-name="P3" draw:layer="layout" draw:type="curve" svg:x1="42.293cm" svg:y1="5.562cm" svg:x2="42.293cm" svg:y2="6.223cm" svg:d="M42293 5562v661" svg:viewBox="0 0 1 662">
          <text:p/>
        </draw:connector>
        <draw:connector draw:style-name="gr3" draw:text-style-name="P3" draw:layer="layout" draw:type="curve" svg:x1="42.593cm" svg:y1="5.562cm" svg:x2="42.593cm" svg:y2="6.223cm" svg:d="M42593 5562v661" svg:viewBox="0 0 1 662">
          <text:p/>
        </draw:connector>
        <draw:connector draw:style-name="gr3" draw:text-style-name="P3" draw:layer="layout" draw:type="curve" svg:x1="42.893cm" svg:y1="5.562cm" svg:x2="42.893cm" svg:y2="6.223cm" svg:d="M42893 5562v661" svg:viewBox="0 0 1 662">
          <text:p/>
        </draw:connector>
        <draw:connector draw:style-name="gr6" draw:text-style-name="P3" draw:layer="layout" draw:type="curve" svg:x1="53.809cm" svg:y1="8.163cm" svg:x2="57.509cm" svg:y2="9.424cm" draw:start-shape="id1" draw:start-glue-point="2" draw:end-shape="id18" draw:end-glue-point="0" svg:d="M53809 8163c0 946 3700 316 3700 1261" svg:viewBox="0 0 3701 1262">
          <text:p/>
        </draw:connector>
        <draw:connector draw:style-name="gr3" draw:text-style-name="P3" draw:layer="layout" draw:type="curve" svg:x1="45.709cm" svg:y1="19.568cm" svg:x2="45.709cm" svg:y2="20.629cm" draw:start-shape="id19" draw:start-glue-point="2" draw:end-shape="id20" draw:end-glue-point="0" svg:d="M45709 19568v1061" svg:viewBox="0 0 1 1062">
          <text:p/>
        </draw:connector>
        <draw:connector draw:style-name="gr3" draw:text-style-name="P3" draw:layer="layout" draw:type="curve" svg:x1="49.309cm" svg:y1="15.566cm" svg:x2="45.709cm" svg:y2="17.028cm" draw:start-shape="id21" draw:start-glue-point="2" draw:end-shape="id19" draw:end-glue-point="0" svg:d="M49309 15566c0 1098-3600 367-3600 1462" svg:viewBox="0 0 3601 1463">
          <text:p/>
        </draw:connector>
        <draw:connector draw:style-name="gr3" draw:text-style-name="P3" draw:layer="layout" draw:type="curve" svg:x1="49.309cm" svg:y1="15.566cm" svg:x2="49.309cm" svg:y2="17.027cm" draw:start-shape="id21" draw:start-glue-point="2" draw:end-shape="id22" draw:end-glue-point="0" svg:d="M49309 15566v1461" svg:viewBox="0 0 1 1462">
          <text:p/>
        </draw:connector>
        <draw:connector draw:style-name="gr3" draw:text-style-name="P3" draw:layer="layout" draw:type="curve" svg:x1="49.34cm" svg:y1="11.859cm" svg:x2="45.709cm" svg:y2="13.027cm" draw:start-shape="id23" draw:start-glue-point="2" draw:end-shape="id24" draw:end-glue-point="0" svg:d="M49340 11859c0 877-3631 294-3631 1168" svg:viewBox="0 0 3632 1169">
          <text:p/>
        </draw:connector>
        <draw:connector draw:style-name="gr3" draw:text-style-name="P3" draw:layer="layout" draw:type="curve" svg:x1="49.34cm" svg:y1="11.859cm" svg:x2="49.309cm" svg:y2="13.026cm" draw:start-shape="id23" draw:start-glue-point="2" draw:end-shape="id21" draw:end-glue-point="0" svg:d="M49340 11859c0 876-31 293-31 1167" svg:viewBox="0 0 32 1168">
          <text:p/>
        </draw:connector>
        <draw:connector draw:style-name="gr7" draw:text-style-name="P3" xml:id="id4" draw:id="id4" draw:layer="layout" draw:type="curve" svg:x1="52.26cm" svg:y1="6.893cm" svg:x2="50.959cm" svg:y2="6.894cm" draw:start-shape="id1" draw:start-glue-point="3" draw:end-shape="id25" draw:end-glue-point="1" svg:d="M52260 6893c-976 0-326 1-1301 1" svg:viewBox="0 0 1302 2">
          <text:p/>
        </draw:connector>
        <draw:custom-shape draw:style-name="gr5" draw:text-style-name="P5" xml:id="id25" draw:id="id25" draw:layer="layout" svg:width="3.099cm" svg:height="2.54cm" svg:x="47.86cm" svg:y="5.624cm">
          <text:p text:style-name="P1"><text:span text:style-name="T4">Unknown</text:span></text:p>
          <text:p text:style-name="P1"><text:span text:style-name="T2">Concubine</text:span></text:p>
          <text:p text:style-name="P1"><text:span text:style-name="T2">Aramitess</text:span></text:p>
          <text:p text:style-name="P1"><text:span text:style-name="T2">1Ch 7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23" draw:id="id23" draw:layer="layout" svg:width="3.099cm" svg:height="2.54cm" svg:x="47.791cm" svg:y="9.319cm">
          <text:p text:style-name="P1"><text:span text:style-name="T4">Maachah</text:span></text:p>
          <text:p text:style-name="P1"><text:span text:style-name="T2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3" draw:layer="layout" draw:type="curve" svg:x1="52.26cm" svg:y1="10.594cm" svg:x2="50.89cm" svg:y2="10.589cm" draw:start-shape="id3" draw:start-glue-point="3" draw:end-shape="id23" draw:end-glue-point="1" svg:d="M52260 10594c-1027 0-343-5-1370-5" svg:viewBox="0 0 1371 6">
          <text:p/>
        </draw:connector>
        <draw:custom-shape draw:style-name="gr2" draw:text-style-name="P2" draw:layer="layout" svg:width="3.099cm" svg:height="2.54cm" svg:x="40.66cm" svg:y="9.325cm">
          <text:p text:style-name="P1"><text:span text:style-name="T4">Huppim</text:span></text:p>
          <text:p text:style-name="P1"><text:span text:style-name="T2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3.099cm" svg:height="2.54cm" svg:x="44.26cm" svg:y="9.326cm">
          <text:p text:style-name="P4"><text:span text:style-name="T5">Shuppim</text:span></text:p>
          <text:p text:style-name="P4"><text:span text:style-name="T6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1" draw:id="id21" draw:layer="layout" svg:width="3.099cm" svg:height="2.54cm" svg:x="47.76cm" svg:y="13.026cm">
          <text:p text:style-name="P1"><text:span text:style-name="T4">Sheresh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4" draw:id="id24" draw:layer="layout" svg:width="3.099cm" svg:height="2.54cm" svg:x="44.16cm" svg:y="13.027cm">
          <text:p text:style-name="P1"><text:span text:style-name="T4">Peresh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2" draw:id="id22" draw:layer="layout" svg:width="3.099cm" svg:height="2.54cm" svg:x="47.76cm" svg:y="17.027cm">
          <text:p text:style-name="P1"><text:span text:style-name="T4">Rakem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9" draw:id="id19" draw:layer="layout" svg:width="3.099cm" svg:height="2.54cm" svg:x="44.16cm" svg:y="17.028cm">
          <text:p text:style-name="P1"><text:span text:style-name="T4">Ulam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0" draw:id="id20" draw:layer="layout" svg:width="3.099cm" svg:height="2.54cm" svg:x="44.16cm" svg:y="20.629cm">
          <text:p text:style-name="P1"><text:span text:style-name="T4">Bedan</text:span></text:p>
          <text:p text:style-name="P1"><text:span text:style-name="T2">1Ch 7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8" draw:id="id18" draw:layer="layout" svg:width="3.099cm" svg:height="2.54cm" svg:x="55.96cm" svg:y="9.424cm">
          <text:p text:style-name="P1"><text:span text:style-name="T4">Gamaliel the son of Pedahzur</text:span></text:p>
          <text:p text:style-name="P1"><text:span text:style-name="T2">Num 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draw:layer="layout" svg:width="19.049cm" svg:height="11.051cm" svg:x="77.979cm" svg:y="1.839cm">
          <text:p text:style-name="P6"><text:span text:style-name="T8">1 Chronicles 7:14-17</text:span></text:p>
          <text:p text:style-name="P6"><text:span text:style-name="T9">14</text:span><text:span text:style-name="T8"> The sons of Manasseh; Ashriel, whom she bare: (but his concubine the Aramitess bare Machir the father of Gilead:</text:span></text:p>
          <text:p text:style-name="P6"><text:span text:style-name="T9">15</text:span><text:span text:style-name="T8"> And Machir took to wife the sister of Huppim and Shuppim, whose sister's name was Maachah;) and the name of the second was Zelophehad: and Zelophehad had daughters.</text:span></text:p>
          <text:p text:style-name="P6"><text:span text:style-name="T9">16</text:span><text:span text:style-name="T8"> </text:span><text:span text:style-name="T10">And Maachah the wife of Machir bare a son, and she called his name Peresh; and the name of his brother was Sheresh; and his sons were Ulam and Rakem.</text:span></text:p>
          <text:p text:style-name="P6"><text:span text:style-name="T9">17</text:span><text:span text:style-name="T11"> </text:span><text:span text:style-name="T10">And the sons of Ulam; Bedan. </text:span><text:span text:style-name="T12">These were the sons of Gilead, the son of Machir, the son of Manasseh.</text:span></text:p>
          <text:p text:style-name="P6"><text:span text:style-name="T11"/></text:p>
          <text:p text:style-name="P6"><text:span text:style-name="T11"/></text:p>
          <text:p text:style-name="P6"><text:span text:style-name="T8">How can Peresh, Sheresh, Ulam, Rakem, and Bedan be sons of Gilea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3.099cm" svg:height="2.54cm" svg:x="59.46cm" svg:y="9.425cm">
          <text:p text:style-name="P1"><text:span text:style-name="T4">Gaddi the son of Susi</text:span></text:p>
          <text:p text:style-name="P1"><text:span text:style-name="T2">Num 13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4cm" svg:x2="61.009cm" svg:y2="9.425cm" draw:end-shape="id26" draw:end-glue-point="0" svg:d="M53809 8164c0 570 7200-60 7200 1261" svg:viewBox="0 0 7201 1262">
          <text:p/>
        </draw:connector>
        <draw:custom-shape draw:style-name="gr2" draw:text-style-name="P2" xml:id="id27" draw:id="id27" draw:layer="layout" svg:width="3.099cm" svg:height="2.54cm" svg:x="62.96cm" svg:y="9.426cm">
          <text:p text:style-name="P1"><text:span text:style-name="T4">Hanniel the son of Ephod</text:span></text:p>
          <text:p text:style-name="P1"><text:span text:style-name="T2">Num 34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5cm" svg:x2="64.509cm" svg:y2="9.426cm" draw:end-shape="id27" draw:end-glue-point="0" svg:d="M53809 8165c0 570 10700-60 10700 1261" svg:viewBox="0 0 10701 1262">
          <text:p/>
        </draw:connector>
        <draw:custom-shape draw:style-name="gr2" draw:text-style-name="P2" xml:id="id28" draw:id="id28" draw:layer="layout" svg:width="3.099cm" svg:height="2.54cm" svg:x="66.56cm" svg:y="9.427cm">
          <text:p text:style-name="P1"><text:span text:style-name="T4">Jair</text:span></text:p>
          <text:p text:style-name="P1"><text:span text:style-name="T2">Deu 3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6cm" svg:x2="68.109cm" svg:y2="9.427cm" draw:end-shape="id28" draw:end-glue-point="0" svg:d="M53809 8166c0 570 14300-60 14300 1261" svg:viewBox="0 0 14301 1262">
          <text:p/>
        </draw:connector>
        <draw:custom-shape draw:style-name="gr2" draw:text-style-name="P2" xml:id="id29" draw:id="id29" draw:layer="layout" svg:width="3.099cm" svg:height="2.54cm" svg:x="70.06cm" svg:y="9.428cm">
          <text:p text:style-name="P1"><text:span text:style-name="T4">Joel the son of Pedaiah</text:span></text:p>
          <text:p text:style-name="P1"><text:span text:style-name="T2">1Ch 27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7cm" svg:x2="71.609cm" svg:y2="9.428cm" draw:end-shape="id29" draw:end-glue-point="0" svg:d="M53809 8167c0 570 17800-60 17800 1261" svg:viewBox="0 0 17801 1262">
          <text:p/>
        </draw:connector>
        <draw:custom-shape draw:style-name="gr2" draw:text-style-name="P2" xml:id="id30" draw:id="id30" draw:layer="layout" svg:width="3.099cm" svg:height="2.54cm" svg:x="73.66cm" svg:y="9.429cm">
          <text:p text:style-name="P1"><text:span text:style-name="T4">Iddo the son of Zechariah</text:span></text:p>
          <text:p text:style-name="P1"><text:span text:style-name="T2">1Ch 27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8cm" svg:x2="75.209cm" svg:y2="9.429cm" draw:end-shape="id30" draw:end-glue-point="0" svg:d="M53809 8168c0 570 21400-60 21400 1261" svg:viewBox="0 0 21401 1262">
          <text:p/>
        </draw:connector>
      </draw:page>
      <draw:page draw:name="page2" draw:style-name="dp2" draw:master-page-name="Default">
        <draw:connector draw:style-name="gr3" draw:text-style-name="P3" draw:layer="layout" draw:type="curve" svg:x1="38.551cm" svg:y1="31.359cm" svg:x2="34.73cm" svg:y2="41.426cm" draw:start-shape="id31" draw:start-glue-point="2" draw:end-shape="id32" draw:end-glue-point="0" svg:d="M38551 31359c0 7549-3821 2516-3821 10067" svg:viewBox="0 0 3822 10068">
          <text:p/>
        </draw:connector>
        <draw:connector draw:style-name="gr3" draw:text-style-name="P3" draw:layer="layout" draw:type="curve" svg:x1="38.551cm" svg:y1="31.359cm" svg:x2="36.622cm" svg:y2="43.927cm" draw:start-shape="id31" draw:start-glue-point="2" draw:end-shape="id33" draw:end-glue-point="0" svg:d="M38551 31359c0 9426-1929 3142-1929 12568" svg:viewBox="0 0 1930 12569">
          <text:p/>
        </draw:connector>
        <draw:connector draw:style-name="gr3" draw:text-style-name="P3" draw:layer="layout" draw:type="curve" svg:x1="38.551cm" svg:y1="31.359cm" svg:x2="38.545cm" svg:y2="41.388cm" draw:start-shape="id31" draw:start-glue-point="2" draw:end-shape="id34" draw:end-glue-point="0" svg:d="M38551 31359c0 7522-6 2508-6 10029" svg:viewBox="0 0 7 10030">
          <text:p/>
        </draw:connector>
        <draw:custom-shape draw:style-name="gr9" draw:text-style-name="P2" xml:id="id37" draw:id="id37" draw:layer="layout" svg:width="2.222cm" svg:height="1.27cm" svg:x="57.13cm" svg:y="2.205cm">
          <text:p text:style-name="P1"><text:span text:style-name="T1">Adam</text:span></text:p>
          <text:p text:style-name="P1"><text:span text:style-name="T13">1Ch 1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2" xml:id="id38" draw:id="id38" draw:layer="layout" svg:width="2.857cm" svg:height="2.083cm" svg:x="56.814cm" svg:y="3.776cm">
          <text:p text:style-name="P1"><text:span text:style-name="T1">Sheth</text:span></text:p>
          <text:p text:style-name="P1"><text:span text:style-name="T13">1Ch 1:1</text:span></text:p>
          <text:p text:style-name="P4"><text:span text:style-name="T14">Seth</text:span></text:p>
          <text:p text:style-name="P4"><text:span text:style-name="T15">Gen 4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9" xml:id="id39" draw:id="id39" draw:layer="layout" svg:width="2.997cm" svg:height="1.778cm" svg:x="56.745cm" svg:y="6.207cm">
          <text:p text:style-name="P8"><text:span text:style-name="T16">Enosh</text:span></text:p>
          <text:p text:style-name="P8"><text:span text:style-name="T17">1Ch 1:1</text:span></text:p>
          <text:p text:style-name="P4"><text:span text:style-name="T16">Enos</text:span></text:p>
          <text:p text:style-name="P4"><text:span text:style-name="T17">Gen 4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9" xml:id="id40" draw:id="id40" draw:layer="layout" svg:width="2.997cm" svg:height="1.778cm" svg:x="56.744cm" svg:y="8.217cm">
          <text:p text:style-name="P8"><text:span text:style-name="T16">Kenan</text:span></text:p>
          <text:p text:style-name="P8"><text:span text:style-name="T17">1Ch 1:2</text:span></text:p>
          <text:p text:style-name="P4"><text:span text:style-name="T16">Cainan</text:span></text:p>
          <text:p text:style-name="P4"><text:span text:style-name="T17">Gen 5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2" xml:id="id41" draw:id="id41" draw:layer="layout" svg:width="2.997cm" svg:height="2.134cm" svg:x="56.743cm" svg:y="10.234cm">
          <text:p text:style-name="P1"><text:span text:style-name="T1">Mahalaleel</text:span></text:p>
          <text:p text:style-name="P1"><text:span text:style-name="T13">1Ch 1:2</text:span></text:p>
          <text:p text:style-name="P4"><text:span text:style-name="T1">Maleleel</text:span></text:p>
          <text:p text:style-name="P4"><text:span text:style-name="T13">Luk 3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2" xml:id="id35" draw:id="id35" draw:layer="layout" svg:width="3.023cm" svg:height="2.083cm" svg:x="56.732cm" svg:y="12.611cm">
          <text:p text:style-name="P1"><text:span text:style-name="T1">Jered</text:span></text:p>
          <text:p text:style-name="P1"><text:span text:style-name="T13">1Ch 1:2</text:span></text:p>
          <text:p text:style-name="P4"><text:span text:style-name="T1">Jared</text:span></text:p>
          <text:p text:style-name="P4"><text:span text:style-name="T13">Gen 5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43cm" svg:y1="14.694cm" svg:x2="58.244cm" svg:y2="14.98cm" draw:start-shape="id35" draw:start-glue-point="2" draw:end-shape="id36" draw:end-glue-point="0" svg:d="M58243 14694c0 214 1 72 1 286" svg:viewBox="0 0 2 287">
          <text:p/>
        </draw:connector>
        <draw:custom-shape draw:style-name="gr14" draw:text-style-name="P2" xml:id="id36" draw:id="id36" draw:layer="layout" svg:width="2.854cm" svg:height="2.083cm" svg:x="56.817cm" svg:y="14.98cm">
          <text:p text:style-name="P1"><text:span text:style-name="T1">Henoch</text:span></text:p>
          <text:p text:style-name="P4"><text:span text:style-name="T13">1Ch 1:3</text:span></text:p>
          <text:p text:style-name="P1"><text:span text:style-name="T1">Enoch</text:span></text:p>
          <text:p text:style-name="P1"><text:span text:style-name="T13">Gen 5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2" xml:id="id42" draw:id="id42" draw:layer="layout" svg:width="3.099cm" svg:height="2.032cm" svg:x="56.696cm" svg:y="17.308cm">
          <text:p text:style-name="P1"><text:span text:style-name="T1">Methuselah</text:span></text:p>
          <text:p text:style-name="P1"><text:span text:style-name="T13">1Ch 1:3</text:span></text:p>
          <text:p text:style-name="P1"><text:span text:style-name="T1">Mathusala</text:span></text:p>
          <text:p text:style-name="P1"><text:span text:style-name="T13">Luke 3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2" xml:id="id43" draw:id="id43" draw:layer="layout" svg:width="2.845cm" svg:height="1.372cm" svg:x="56.823cm" svg:y="19.667cm">
          <text:p text:style-name="P1"><text:span text:style-name="T1">Lamech</text:span></text:p>
          <text:p text:style-name="P1"><text:span text:style-name="T13">1Ch 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44" draw:id="id44" draw:layer="layout" svg:width="2.845cm" svg:height="2.032cm" svg:x="56.823cm" svg:y="21.448cm">
          <text:p text:style-name="P1"><text:span text:style-name="T1">Noah</text:span></text:p>
          <text:p text:style-name="P1"><text:span text:style-name="T13">1Ch 1:4</text:span></text:p>
          <text:p text:style-name="P4"><text:span text:style-name="T1">Noe</text:span></text:p>
          <text:p text:style-name="P4"><text:span text:style-name="T13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46" draw:id="id46" draw:layer="layout" svg:width="2.845cm" svg:height="2.032cm" svg:x="56.823cm" svg:y="25.391cm">
          <text:p text:style-name="P1"><text:span text:style-name="T1">Shem</text:span></text:p>
          <text:p text:style-name="P1"><text:span text:style-name="T13">1Ch 1:4</text:span></text:p>
          <text:p text:style-name="P4"><text:span text:style-name="T1">Sem</text:span></text:p>
          <text:p text:style-name="P4"><text:span text:style-name="T13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5" draw:id="id45" draw:layer="layout" svg:width="2.854cm" svg:height="1.588cm" svg:x="32.143cm" svg:y="25.444cm">
          <text:p text:style-name="P1"><text:span text:style-name="T1">Ham</text:span></text:p>
          <text:p text:style-name="P1"><text:span text:style-name="T13">1Ch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7" draw:id="id47" draw:layer="layout" svg:width="2.854cm" svg:height="1.588cm" svg:x="83.911cm" svg:y="25.56cm">
          <text:p text:style-name="P1"><text:span text:style-name="T1">Japheth</text:span></text:p>
          <text:p text:style-name="P1"><text:span text:style-name="T13">1Ch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9" draw:id="id49" draw:layer="layout" svg:width="2.854cm" svg:height="1.588cm" svg:x="78.539cm" svg:y="29.225cm">
          <text:p text:style-name="P1"><text:span text:style-name="T1">Magog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2" xml:id="id48" draw:id="id48" draw:layer="layout" svg:width="2.54cm" svg:height="1.587cm" svg:x="75.505cm" svg:y="29.226cm">
          <text:p text:style-name="P1"><text:span text:style-name="T1">Gomer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2" xml:id="id50" draw:id="id50" draw:layer="layout" svg:width="3.378cm" svg:height="2.184cm" svg:x="81.818cm" svg:y="29.225cm">
          <text:p text:style-name="P1"><text:span text:style-name="T1">Madai</text:span></text:p>
          <text:p text:style-name="P1"><text:span text:style-name="T18">Medes</text:span></text:p>
          <text:p text:style-name="P1"><text:span text:style-name="T18">Media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2" draw:id="id52" draw:layer="layout" svg:width="2.854cm" svg:height="1.588cm" svg:x="89.994cm" svg:y="29.225cm">
          <text:p text:style-name="P1"><text:span text:style-name="T1">Tubal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2" xml:id="id51" draw:id="id51" draw:layer="layout" svg:width="3.81cm" svg:height="1.588cm" svg:x="85.81cm" svg:y="29.225cm">
          <text:p text:style-name="P1"><text:span text:style-name="T1">Javan</text:span></text:p>
          <text:p text:style-name="P1"><text:span text:style-name="T18">Grecia/Greece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2" xml:id="id53" draw:id="id53" draw:layer="layout" svg:width="2.845cm" svg:height="1.727cm" svg:x="93.373cm" svg:y="29.225cm">
          <text:p text:style-name="P1"><text:span text:style-name="T1">Meshech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4" draw:id="id54" draw:layer="layout" svg:width="2.854cm" svg:height="1.588cm" svg:x="96.715cm" svg:y="29.226cm">
          <text:p text:style-name="P1"><text:span text:style-name="T1">Tiras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6" draw:id="id56" draw:layer="layout" svg:width="2.854cm" svg:height="1.588cm" svg:x="78.576cm" svg:y="34.526cm">
          <text:p text:style-name="P1"><text:span text:style-name="T1">Riphath</text:span></text:p>
          <text:p text:style-name="P1"><text:span text:style-name="T13">1Ch 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2" xml:id="id55" draw:id="id55" draw:layer="layout" svg:width="2.946cm" svg:height="2.134cm" svg:x="75.335cm" svg:y="34.527cm">
          <text:p text:style-name="P1"><text:span text:style-name="T1">Ashchenaz</text:span></text:p>
          <text:p text:style-name="P1"><text:span text:style-name="T13">1Ch 1:6</text:span></text:p>
          <text:p text:style-name="P1"><text:span text:style-name="T1">Ashkenaz</text:span></text:p>
          <text:p text:style-name="P1"><text:span text:style-name="T13">Gen 10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7" draw:id="id57" draw:layer="layout" svg:width="2.854cm" svg:height="1.588cm" svg:x="81.817cm" svg:y="34.526cm">
          <text:p text:style-name="P1"><text:span text:style-name="T1">Togarmah</text:span></text:p>
          <text:p text:style-name="P1"><text:span text:style-name="T13">1Ch 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41cm" svg:y1="3.475cm" svg:x2="58.242cm" svg:y2="3.776cm" draw:start-shape="id37" draw:start-glue-point="2" draw:end-shape="id38" draw:end-glue-point="0" svg:d="M58241 3475c0 226 1 76 1 301" svg:viewBox="0 0 2 302">
          <text:p/>
        </draw:connector>
        <draw:connector draw:style-name="gr3" draw:text-style-name="P3" draw:layer="layout" draw:type="curve" svg:x1="58.242cm" svg:y1="5.859cm" svg:x2="58.243cm" svg:y2="6.207cm" draw:start-shape="id38" draw:start-glue-point="2" draw:end-shape="id39" draw:end-glue-point="0" svg:d="M58242 5859c0 261 1 87 1 348" svg:viewBox="0 0 2 349">
          <text:p/>
        </draw:connector>
        <draw:connector draw:style-name="gr3" draw:text-style-name="P3" draw:layer="layout" draw:type="curve" svg:x1="58.243cm" svg:y1="7.985cm" svg:x2="58.242cm" svg:y2="8.217cm" draw:start-shape="id39" draw:start-glue-point="2" draw:end-shape="id40" draw:end-glue-point="0" svg:d="M58243 7985c0 175-1 60-1 232" svg:viewBox="0 0 2 233">
          <text:p/>
        </draw:connector>
        <draw:connector draw:style-name="gr3" draw:text-style-name="P3" draw:layer="layout" draw:type="curve" svg:x1="58.242cm" svg:y1="9.995cm" svg:x2="58.241cm" svg:y2="10.234cm" draw:start-shape="id40" draw:start-glue-point="2" draw:end-shape="id41" draw:end-glue-point="0" svg:d="M58242 9995c0 180-1 61-1 239" svg:viewBox="0 0 2 240">
          <text:p/>
        </draw:connector>
        <draw:connector draw:style-name="gr3" draw:text-style-name="P3" draw:layer="layout" draw:type="curve" svg:x1="58.241cm" svg:y1="12.368cm" svg:x2="58.243cm" svg:y2="12.611cm" draw:start-shape="id41" draw:start-glue-point="2" draw:end-shape="id35" draw:end-glue-point="0" svg:d="M58241 12368c0 183 2 62 2 243" svg:viewBox="0 0 3 244">
          <text:p/>
        </draw:connector>
        <draw:connector draw:style-name="gr3" draw:text-style-name="P3" draw:layer="layout" draw:type="curve" svg:x1="58.244cm" svg:y1="17.063cm" svg:x2="58.245cm" svg:y2="17.308cm" draw:start-shape="id36" draw:start-glue-point="2" draw:end-shape="id42" draw:end-glue-point="0" svg:d="M58244 17063c0 184 1 62 1 245" svg:viewBox="0 0 2 246">
          <text:p/>
        </draw:connector>
        <draw:connector draw:style-name="gr3" draw:text-style-name="P3" draw:layer="layout" draw:type="curve" svg:x1="58.245cm" svg:y1="19.34cm" svg:x2="58.245cm" svg:y2="19.667cm" draw:start-shape="id42" draw:start-glue-point="2" draw:end-shape="id43" draw:end-glue-point="0" svg:d="M58245 19340v327" svg:viewBox="0 0 1 328">
          <text:p/>
        </draw:connector>
        <draw:connector draw:style-name="gr3" draw:text-style-name="P3" draw:layer="layout" draw:type="curve" svg:x1="58.245cm" svg:y1="21.039cm" svg:x2="58.245cm" svg:y2="21.448cm" draw:start-shape="id43" draw:start-glue-point="2" draw:end-shape="id44" draw:end-glue-point="0" svg:d="M58245 21039v409" svg:viewBox="0 0 1 410">
          <text:p/>
        </draw:connector>
        <draw:connector draw:style-name="gr3" draw:text-style-name="P3" draw:layer="layout" draw:type="curve" svg:x1="58.245cm" svg:y1="23.48cm" svg:x2="33.57cm" svg:y2="25.444cm" draw:start-shape="id44" draw:start-glue-point="2" draw:end-shape="id45" draw:end-glue-point="0" svg:d="M58245 23480c0 1474-24675 493-24675 1964" svg:viewBox="0 0 24676 1965">
          <text:p/>
        </draw:connector>
        <draw:connector draw:style-name="gr3" draw:text-style-name="P3" draw:layer="layout" draw:type="curve" svg:x1="58.245cm" svg:y1="23.48cm" svg:x2="58.245cm" svg:y2="25.391cm" draw:start-shape="id44" draw:start-glue-point="2" draw:end-shape="id46" draw:end-glue-point="0" svg:d="M58245 23480v1911" svg:viewBox="0 0 1 1912">
          <text:p/>
        </draw:connector>
        <draw:connector draw:style-name="gr3" draw:text-style-name="P3" draw:layer="layout" draw:type="curve" svg:x1="58.245cm" svg:y1="23.48cm" svg:x2="85.338cm" svg:y2="25.56cm" draw:start-shape="id44" draw:start-glue-point="2" draw:end-shape="id47" draw:end-glue-point="0" svg:d="M58245 23480c0 1561 27093 522 27093 2080" svg:viewBox="0 0 27094 2081">
          <text:p/>
        </draw:connector>
        <draw:connector draw:style-name="gr3" draw:text-style-name="P3" draw:layer="layout" draw:type="curve" svg:x1="85.338cm" svg:y1="27.148cm" svg:x2="76.775cm" svg:y2="29.226cm" draw:start-shape="id47" draw:start-glue-point="2" draw:end-shape="id48" draw:end-glue-point="0" svg:d="M85338 27148c0 1558-8563 520-8563 2078" svg:viewBox="0 0 8564 2079">
          <text:p/>
        </draw:connector>
        <draw:connector draw:style-name="gr3" draw:text-style-name="P3" draw:layer="layout" draw:type="curve" svg:x1="85.338cm" svg:y1="27.148cm" svg:x2="79.966cm" svg:y2="29.225cm" draw:start-shape="id47" draw:start-glue-point="2" draw:end-shape="id49" draw:end-glue-point="0" svg:d="M85338 27148c0 1558-5372 520-5372 2077" svg:viewBox="0 0 5373 2078">
          <text:p/>
        </draw:connector>
        <draw:connector draw:style-name="gr3" draw:text-style-name="P3" draw:layer="layout" draw:type="curve" svg:x1="85.338cm" svg:y1="27.148cm" svg:x2="83.507cm" svg:y2="29.225cm" draw:start-shape="id47" draw:start-glue-point="2" draw:end-shape="id50" draw:end-glue-point="0" svg:d="M85338 27148c0 1558-1831 520-1831 2077" svg:viewBox="0 0 1832 2078">
          <text:p/>
        </draw:connector>
        <draw:connector draw:style-name="gr3" draw:text-style-name="P3" draw:layer="layout" draw:type="curve" svg:x1="85.338cm" svg:y1="27.148cm" svg:x2="87.715cm" svg:y2="29.225cm" draw:start-shape="id47" draw:start-glue-point="2" draw:end-shape="id51" draw:end-glue-point="0" svg:d="M85338 27148c0 1558 2377 520 2377 2077" svg:viewBox="0 0 2378 2078">
          <text:p/>
        </draw:connector>
        <draw:connector draw:style-name="gr3" draw:text-style-name="P3" draw:layer="layout" draw:type="curve" svg:x1="85.338cm" svg:y1="27.148cm" svg:x2="91.421cm" svg:y2="29.225cm" draw:start-shape="id47" draw:start-glue-point="2" draw:end-shape="id52" draw:end-glue-point="0" svg:d="M85338 27148c0 1558 6083 520 6083 2077" svg:viewBox="0 0 6084 2078">
          <text:p/>
        </draw:connector>
        <draw:connector draw:style-name="gr3" draw:text-style-name="P3" draw:layer="layout" draw:type="curve" svg:x1="85.338cm" svg:y1="27.148cm" svg:x2="94.795cm" svg:y2="29.225cm" draw:start-shape="id47" draw:start-glue-point="2" draw:end-shape="id53" draw:end-glue-point="0" svg:d="M85338 27148c0 1558 9457 520 9457 2077" svg:viewBox="0 0 9458 2078">
          <text:p/>
        </draw:connector>
        <draw:connector draw:style-name="gr3" draw:text-style-name="P3" draw:layer="layout" draw:type="curve" svg:x1="85.338cm" svg:y1="27.148cm" svg:x2="98.142cm" svg:y2="29.226cm" draw:start-shape="id47" draw:start-glue-point="2" draw:end-shape="id54" draw:end-glue-point="0" svg:d="M85338 27148c0 1560 12804 521 12804 2078" svg:viewBox="0 0 12805 2079">
          <text:p/>
        </draw:connector>
        <draw:connector draw:style-name="gr3" draw:text-style-name="P3" draw:layer="layout" draw:type="curve" svg:x1="76.775cm" svg:y1="30.813cm" svg:x2="76.808cm" svg:y2="34.527cm" draw:start-shape="id48" draw:start-glue-point="2" draw:end-shape="id55" draw:end-glue-point="0" svg:d="M76775 30813c0 2785 33 929 33 3714" svg:viewBox="0 0 34 3715">
          <text:p/>
        </draw:connector>
        <draw:connector draw:style-name="gr3" draw:text-style-name="P3" draw:layer="layout" draw:type="curve" svg:x1="76.775cm" svg:y1="30.813cm" svg:x2="80.003cm" svg:y2="34.526cm" draw:start-shape="id48" draw:start-glue-point="2" draw:end-shape="id56" draw:end-glue-point="0" svg:d="M76775 30813c0 2785 3228 929 3228 3713" svg:viewBox="0 0 3229 3714">
          <text:p/>
        </draw:connector>
        <draw:connector draw:style-name="gr3" draw:text-style-name="P3" draw:layer="layout" draw:type="curve" svg:x1="76.775cm" svg:y1="30.813cm" svg:x2="83.244cm" svg:y2="34.526cm" draw:start-shape="id48" draw:start-glue-point="2" draw:end-shape="id57" draw:end-glue-point="0" svg:d="M76775 30813c0 2785 6469 929 6469 3713" svg:viewBox="0 0 6470 3714">
          <text:p/>
        </draw:connector>
        <draw:connector draw:style-name="gr3" draw:text-style-name="P3" draw:layer="layout" draw:type="curve" svg:x1="87.715cm" svg:y1="30.813cm" svg:x2="87.721cm" svg:y2="34.592cm" draw:start-shape="id51" draw:start-glue-point="2" draw:end-shape="id58" draw:end-glue-point="0" svg:d="M87715 30813c0 2835 6 946 6 3779" svg:viewBox="0 0 7 3780">
          <text:p/>
        </draw:connector>
        <draw:connector draw:style-name="gr3" draw:text-style-name="P3" draw:layer="layout" draw:type="curve" svg:x1="87.715cm" svg:y1="30.813cm" svg:x2="94.528cm" svg:y2="34.526cm" draw:start-shape="id51" draw:start-glue-point="2" draw:end-shape="id59" draw:end-glue-point="0" svg:d="M87715 30813c0 2785 6813 929 6813 3713" svg:viewBox="0 0 6814 3714">
          <text:p/>
        </draw:connector>
        <draw:connector draw:style-name="gr3" draw:text-style-name="P3" draw:layer="layout" draw:type="curve" svg:x1="87.715cm" svg:y1="30.813cm" svg:x2="91.21cm" svg:y2="34.526cm" draw:start-shape="id51" draw:start-glue-point="2" draw:end-shape="id60" draw:end-glue-point="0" svg:d="M87715 30813c0 2785 3495 929 3495 3713" svg:viewBox="0 0 3496 3714">
          <text:p/>
        </draw:connector>
        <draw:connector draw:style-name="gr3" draw:text-style-name="P3" draw:layer="layout" draw:type="curve" svg:x1="33.57cm" svg:y1="27.032cm" svg:x2="28.694cm" svg:y2="29.275cm" draw:start-shape="id45" draw:start-glue-point="2" draw:end-shape="id61" draw:end-glue-point="0" svg:d="M33570 27032c0 1683-4876 562-4876 2243" svg:viewBox="0 0 4877 2244">
          <text:p/>
        </draw:connector>
        <draw:connector draw:style-name="gr3" draw:text-style-name="P3" draw:layer="layout" draw:type="curve" svg:x1="33.57cm" svg:y1="27.032cm" svg:x2="35.284cm" svg:y2="29.275cm" draw:start-shape="id45" draw:start-glue-point="2" draw:end-shape="id62" draw:end-glue-point="0" svg:d="M33570 27032c0 1683 1714 562 1714 2243" svg:viewBox="0 0 1715 2244">
          <text:p/>
        </draw:connector>
        <draw:connector draw:style-name="gr3" draw:text-style-name="P3" draw:layer="layout" draw:type="curve" svg:x1="33.57cm" svg:y1="27.032cm" svg:x2="38.551cm" svg:y2="29.276cm" draw:start-shape="id45" draw:start-glue-point="2" draw:end-shape="id31" draw:end-glue-point="0" svg:d="M33570 27032c0 1683 4981 561 4981 2244" svg:viewBox="0 0 4982 2245">
          <text:p/>
        </draw:connector>
        <draw:connector draw:style-name="gr3" draw:text-style-name="P3" draw:layer="layout" draw:type="curve" svg:x1="28.694cm" svg:y1="30.863cm" svg:x2="4.823cm" svg:y2="33.088cm" draw:start-shape="id61" draw:start-glue-point="2" draw:end-shape="id63" draw:end-glue-point="0" svg:d="M28694 30863c0 1669-23871 557-23871 2225" svg:viewBox="0 0 23872 2226">
          <text:p/>
        </draw:connector>
        <draw:connector draw:style-name="gr3" draw:text-style-name="P3" draw:layer="layout" draw:type="curve" svg:x1="28.694cm" svg:y1="30.863cm" svg:x2="8.212cm" svg:y2="33.088cm" draw:start-shape="id61" draw:start-glue-point="2" draw:end-shape="id64" draw:end-glue-point="0" svg:d="M28694 30863c0 1669-20482 557-20482 2225" svg:viewBox="0 0 20483 2226">
          <text:p/>
        </draw:connector>
        <draw:connector draw:style-name="gr3" draw:text-style-name="P3" draw:layer="layout" draw:type="curve" svg:x1="28.694cm" svg:y1="30.863cm" svg:x2="11.491cm" svg:y2="33.088cm" draw:start-shape="id61" draw:start-glue-point="2" draw:end-shape="id65" draw:end-glue-point="0" svg:d="M28694 30863c0 1669-17203 557-17203 2225" svg:viewBox="0 0 17204 2226">
          <text:p/>
        </draw:connector>
        <draw:connector draw:style-name="gr3" draw:text-style-name="P3" draw:layer="layout" draw:type="curve" svg:x1="87.715cm" svg:y1="30.813cm" svg:x2="97.89cm" svg:y2="34.582cm" draw:start-shape="id51" draw:start-glue-point="2" draw:end-shape="id66" draw:end-glue-point="0" svg:d="M87715 30813c0 2827 10175 943 10175 3769" svg:viewBox="0 0 10176 3770">
          <text:p/>
        </draw:connector>
        <draw:connector draw:style-name="gr3" draw:text-style-name="P3" draw:layer="layout" draw:type="curve" svg:x1="33.57cm" svg:y1="27.032cm" svg:x2="32.048cm" svg:y2="29.275cm" draw:start-shape="id45" draw:end-shape="id67" draw:end-glue-point="0" svg:d="M33570 27032c0 1683-1522 562-1522 2243" svg:viewBox="0 0 1523 2244">
          <text:p/>
        </draw:connector>
        <draw:connector draw:style-name="gr3" draw:text-style-name="P3" draw:layer="layout" draw:type="curve" svg:x1="28.694cm" svg:y1="30.863cm" svg:x2="14.892cm" svg:y2="33.089cm" draw:start-shape="id61" draw:start-glue-point="2" draw:end-shape="id68" draw:end-glue-point="0" svg:d="M28694 30863c0 1671-13802 558-13802 2226" svg:viewBox="0 0 13803 2227">
          <text:p/>
        </draw:connector>
        <draw:connector draw:style-name="gr3" draw:text-style-name="P3" draw:layer="layout" draw:type="curve" svg:x1="28.694cm" svg:y1="30.863cm" svg:x2="18.293cm" svg:y2="33.09cm" draw:start-shape="id61" draw:start-glue-point="2" draw:end-shape="id69" draw:end-glue-point="0" svg:d="M28694 30863c0 1671-10401 558-10401 2227" svg:viewBox="0 0 10402 2228">
          <text:p/>
        </draw:connector>
        <draw:connector draw:style-name="gr3" draw:text-style-name="P3" draw:layer="layout" draw:type="curve" svg:x1="28.694cm" svg:y1="30.863cm" svg:x2="21.594cm" svg:y2="33.091cm" draw:start-shape="id61" draw:start-glue-point="2" draw:end-shape="id70" draw:end-glue-point="0" svg:d="M28694 30863c0 1672-7100 559-7100 2228" svg:viewBox="0 0 7101 2229">
          <text:p/>
        </draw:connector>
        <draw:connector draw:style-name="gr3" draw:text-style-name="P3" draw:layer="layout" draw:type="curve" svg:x1="32.048cm" svg:y1="30.863cm" svg:x2="9.386cm" svg:y2="42.735cm" draw:start-shape="id67" draw:start-glue-point="2" draw:end-shape="id71" draw:end-glue-point="0" svg:d="M32048 30863c0 8904-22662 2968-22662 11872" svg:viewBox="0 0 22663 11873">
          <text:p/>
        </draw:connector>
        <draw:custom-shape draw:style-name="gr24" draw:text-style-name="P2" xml:id="id60" draw:id="id60" draw:layer="layout" svg:width="2.854cm" svg:height="1.727cm" svg:x="89.783cm" svg:y="34.526cm">
          <text:p text:style-name="P1"><text:span text:style-name="T1">Tarshish</text:span></text:p>
          <text:p text:style-name="P1"><text:span text:style-name="T13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8" draw:id="id58" draw:layer="layout" svg:width="2.854cm" svg:height="1.588cm" svg:x="86.294cm" svg:y="34.592cm">
          <text:p text:style-name="P1"><text:span text:style-name="T1">Elishah</text:span></text:p>
          <text:p text:style-name="P1"><text:span text:style-name="T13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2" xml:id="id59" draw:id="id59" draw:layer="layout" svg:width="2.845cm" svg:height="2.184cm" svg:x="93.106cm" svg:y="34.526cm">
          <text:p text:style-name="P1"><text:span text:style-name="T1">Kittim</text:span></text:p>
          <text:p text:style-name="P1"><text:span text:style-name="T13">1Ch 1:7</text:span></text:p>
          <text:p text:style-name="P1"><text:span text:style-name="T18">Chittim</text:span></text:p>
          <text:p text:style-name="P1"><text:span text:style-name="T19">Cypr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66" draw:id="id66" draw:layer="layout" svg:width="2.854cm" svg:height="1.588cm" svg:x="96.463cm" svg:y="34.582cm">
          <text:p text:style-name="P1"><text:span text:style-name="T1">Dodanim</text:span></text:p>
          <text:p text:style-name="P1"><text:span text:style-name="T18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67" draw:id="id67" draw:layer="layout" svg:width="2.854cm" svg:height="1.588cm" svg:x="30.621cm" svg:y="29.275cm">
          <text:p text:style-name="P1"><text:span text:style-name="T1">Mizraim</text:span></text:p>
          <text:p text:style-name="P1"><text:span text:style-name="T18">Egypt(ian)</text:span></text:p>
          <text:p text:style-name="P1"><text:span text:style-name="T13">1Ch 1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2" xml:id="id61" draw:id="id61" draw:layer="layout" svg:width="3.124cm" svg:height="1.588cm" svg:x="27.132cm" svg:y="29.275cm">
          <text:p text:style-name="P1"><text:span text:style-name="T1">Cush</text:span></text:p>
          <text:p text:style-name="P1"><text:span text:style-name="T18">Ethiopia(ns)</text:span></text:p>
          <text:p text:style-name="P1"><text:span text:style-name="T13">1Ch 1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2" xml:id="id62" draw:id="id62" draw:layer="layout" svg:width="3.099cm" svg:height="3.505cm" svg:x="33.735cm" svg:y="29.275cm">
          <text:p text:style-name="P1"><text:span text:style-name="T1">Put</text:span></text:p>
          <text:p text:style-name="P1"><text:span text:style-name="T13">1Ch 1:8</text:span></text:p>
          <text:p text:style-name="P1"><text:span text:style-name="T1">Phut</text:span></text:p>
          <text:p text:style-name="P1"><text:span text:style-name="T13">Gen 10:6</text:span></text:p>
          <text:p text:style-name="P1"><text:span text:style-name="T1">Libya(ns)</text:span></text:p>
          <text:p text:style-name="P1"><text:span text:style-name="T13">Jer 46:9</text:span></text:p>
          <text:p text:style-name="P1"><text:span text:style-name="T13">Eze 30:5, 38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2" xml:id="id31" draw:id="id31" draw:layer="layout" svg:width="2.997cm" svg:height="2.083cm" svg:x="37.053cm" svg:y="29.276cm">
          <text:p text:style-name="P1"><text:span text:style-name="T1">Canaan</text:span></text:p>
          <text:p text:style-name="P1"><text:span text:style-name="T13">1Ch 1:8</text:span></text:p>
          <text:p text:style-name="P1"><text:span text:style-name="T1">Canaanites</text:span></text:p>
          <text:p text:style-name="P1"><text:span text:style-name="T13">Gen 10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4" draw:id="id64" draw:layer="layout" svg:width="2.854cm" svg:height="1.588cm" svg:x="6.785cm" svg:y="33.088cm">
          <text:p text:style-name="P1"><text:span text:style-name="T1">Havilah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3" draw:id="id63" draw:layer="layout" svg:width="2.854cm" svg:height="1.588cm" svg:x="3.396cm" svg:y="33.088cm">
          <text:p text:style-name="P1"><text:span text:style-name="T1">Seba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" xml:id="id65" draw:id="id65" draw:layer="layout" svg:width="2.854cm" svg:height="2.032cm" svg:x="10.064cm" svg:y="33.088cm">
          <text:p text:style-name="P1"><text:span text:style-name="T1">Sabta</text:span></text:p>
          <text:p text:style-name="P1"><text:span text:style-name="T13">1Ch 1:9</text:span></text:p>
          <text:p text:style-name="P1"><text:span text:style-name="T1">Sabtah</text:span></text:p>
          <text:p text:style-name="P1"><text:span text:style-name="T13">Gen 10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8" draw:id="id68" draw:layer="layout" svg:width="2.854cm" svg:height="1.588cm" svg:x="13.465cm" svg:y="33.089cm">
          <text:p text:style-name="P1"><text:span text:style-name="T1">Raamah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9" draw:id="id69" draw:layer="layout" svg:width="2.854cm" svg:height="1.588cm" svg:x="16.866cm" svg:y="33.09cm">
          <text:p text:style-name="P1"><text:span text:style-name="T1">Sabtecha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0" draw:id="id70" draw:layer="layout" svg:width="2.854cm" svg:height="1.588cm" svg:x="20.167cm" svg:y="33.091cm">
          <text:p text:style-name="P1"><text:span text:style-name="T1">Nimrod</text:span></text:p>
          <text:p text:style-name="P1"><text:span text:style-name="T18">1Ch 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4" draw:id="id94" draw:layer="layout" svg:width="2.854cm" svg:height="1.588cm" svg:x="11.962cm" svg:y="42.735cm">
          <text:p text:style-name="P1"><text:span text:style-name="T1">Anam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2" xml:id="id71" draw:id="id71" draw:layer="layout" svg:width="4.369cm" svg:height="1.981cm" svg:x="7.202cm" svg:y="42.735cm">
          <text:p text:style-name="P1"><text:span text:style-name="T1">Ludim</text:span></text:p>
          <text:p text:style-name="P4"><text:span text:style-name="T13">1Ch 1:11</text:span></text:p>
          <text:p text:style-name="P1"><text:span text:style-name="T1">Lydians</text:span></text:p>
          <text:p text:style-name="P1"><text:span text:style-name="T13">Jer 46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100" draw:id="id100" draw:layer="layout" svg:width="2.854cm" svg:height="1.588cm" svg:x="15.299cm" svg:y="42.735cm">
          <text:p text:style-name="P1"><text:span text:style-name="T1">Lehab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xml:id="id95" draw:id="id95" draw:layer="layout" svg:width="2.972cm" svg:height="1.588cm" svg:x="18.616cm" svg:y="42.736cm">
          <text:p text:style-name="P1"><text:span text:style-name="T1">Naphtuh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6" draw:id="id96" draw:layer="layout" svg:width="2.854cm" svg:height="1.588cm" svg:x="22.017cm" svg:y="42.737cm">
          <text:p text:style-name="P1"><text:span text:style-name="T1">Pathrusim</text:span></text:p>
          <text:p text:style-name="P1"><text:span text:style-name="T13">1Ch 1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101" draw:id="id101" draw:layer="layout" svg:width="2.854cm" svg:height="1.588cm" svg:x="25.271cm" svg:y="42.738cm">
          <text:p text:style-name="P1"><text:span text:style-name="T1">Casluhim</text:span></text:p>
          <text:p text:style-name="P1"><text:span text:style-name="T13">1Ch 1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2" xml:id="id102" draw:id="id102" draw:layer="layout" svg:width="3.404cm" svg:height="2.184cm" svg:x="28.504cm" svg:y="42.739cm">
          <text:p text:style-name="P1"><text:span text:style-name="T1">Caphthorim</text:span></text:p>
          <text:p text:style-name="P1"><text:span text:style-name="T13">1Ch 1:12</text:span></text:p>
          <text:p text:style-name="P1"><text:span text:style-name="T1">Caphtorim</text:span></text:p>
          <text:p text:style-name="P1"><text:span text:style-name="T13">Gen 10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66cm" svg:y1="36.44cm" svg:x2="58.272cm" svg:y2="38.423cm" draw:start-shape="id72" draw:start-glue-point="2" draw:end-shape="id73" draw:end-glue-point="0" svg:d="M58266 36440c0 1488 6 497 6 1983" svg:viewBox="0 0 7 1984">
          <text:p/>
        </draw:connector>
        <draw:connector draw:style-name="gr3" draw:text-style-name="P3" draw:layer="layout" draw:type="curve" svg:x1="58.272cm" svg:y1="40.201cm" svg:x2="58.278cm" svg:y2="42.351cm" draw:start-shape="id73" draw:start-glue-point="2" draw:end-shape="id74" draw:end-glue-point="0" svg:d="M58272 40201c0 1614 6 539 6 2150" svg:viewBox="0 0 7 2151">
          <text:p/>
        </draw:connector>
        <draw:connector draw:style-name="gr3" draw:text-style-name="P3" draw:layer="layout" draw:type="curve" svg:x1="58.272cm" svg:y1="40.201cm" svg:x2="61.679cm" svg:y2="42.352cm" draw:start-shape="id73" draw:start-glue-point="2" draw:end-shape="id75" draw:end-glue-point="0" svg:d="M58272 40201c0 1614 3407 539 3407 2151" svg:viewBox="0 0 3408 2152">
          <text:p/>
        </draw:connector>
        <draw:connector draw:style-name="gr3" draw:text-style-name="P3" draw:layer="layout" draw:type="curve" svg:x1="61.679cm" svg:y1="43.94cm" svg:x2="85.349cm" svg:y2="46.71cm" draw:start-shape="id75" draw:start-glue-point="2" draw:end-shape="id76" draw:end-glue-point="0" svg:d="M61679 43940c0 2079 23670 694 23670 2770" svg:viewBox="0 0 23671 2771">
          <text:p/>
        </draw:connector>
        <draw:connector draw:style-name="gr3" draw:text-style-name="P3" draw:layer="layout" draw:type="curve" svg:x1="61.679cm" svg:y1="43.94cm" svg:x2="81.894cm" svg:y2="46.712cm" draw:start-shape="id75" draw:start-glue-point="2" draw:end-shape="id77" draw:end-glue-point="0" svg:d="M61679 43940c0 2080 20215 695 20215 2772" svg:viewBox="0 0 20216 2773">
          <text:p/>
        </draw:connector>
        <draw:connector draw:style-name="gr3" draw:text-style-name="P3" draw:layer="layout" draw:type="curve" svg:x1="65.119cm" svg:y1="31.092cm" svg:x2="68.396cm" svg:y2="34.607cm" draw:start-shape="id78" draw:start-glue-point="2" draw:end-shape="id79" draw:end-glue-point="0" svg:d="M65119 31092c0 2637 3277 880 3277 3515" svg:viewBox="0 0 3278 3516">
          <text:p/>
        </draw:connector>
        <draw:connector draw:style-name="gr34" draw:text-style-name="P3" draw:layer="layout" draw:type="curve" svg:x1="58.266cm" svg:y1="30.843cm" svg:x2="58.266cm" svg:y2="34.306cm" draw:start-shape="id80" draw:start-glue-point="2" draw:end-shape="id72" draw:end-glue-point="0" svg:d="M58266 30843v3463" svg:viewBox="0 0 1 3464">
          <text:p/>
        </draw:connector>
        <draw:connector draw:style-name="gr3" draw:text-style-name="P3" draw:layer="layout" draw:type="curve" svg:x1="61.626cm" svg:y1="60.709cm" svg:x2="92.782cm" svg:y2="62.268cm" draw:start-shape="id81" draw:start-glue-point="2" draw:end-shape="id82" svg:d="M61626 60709c0 1170 31156 391 31156 1559" svg:viewBox="0 0 31157 1560">
          <text:p/>
        </draw:connector>
        <draw:connector draw:style-name="gr3" draw:text-style-name="P3" draw:layer="layout" draw:type="curve" svg:x1="61.626cm" svg:y1="60.709cm" svg:x2="96.188cm" svg:y2="62.269cm" draw:start-shape="id81" draw:start-glue-point="2" draw:end-shape="id83" draw:end-glue-point="0" svg:d="M61626 60709c0 1171 34562 392 34562 1560" svg:viewBox="0 0 34563 1561">
          <text:p/>
        </draw:connector>
        <draw:connector draw:style-name="gr3" draw:text-style-name="P3" draw:layer="layout" draw:type="curve" svg:x1="61.626cm" svg:y1="60.709cm" svg:x2="99.606cm" svg:y2="62.27cm" draw:start-shape="id81" draw:start-glue-point="2" draw:end-shape="id84" draw:end-glue-point="0" svg:d="M61626 60709c0 1171 37980 391 37980 1561" svg:viewBox="0 0 37981 1562">
          <text:p/>
        </draw:connector>
        <draw:connector draw:style-name="gr3" draw:text-style-name="P3" draw:layer="layout" draw:type="curve" svg:x1="61.679cm" svg:y1="43.94cm" svg:x2="88.841cm" svg:y2="46.711cm" draw:start-shape="id75" draw:start-glue-point="2" draw:end-shape="id85" draw:end-glue-point="0" svg:d="M61679 43940c0 2079 27162 694 27162 2771" svg:viewBox="0 0 27163 2772">
          <text:p/>
        </draw:connector>
        <draw:connector draw:style-name="gr3" draw:text-style-name="P3" draw:layer="layout" draw:type="curve" svg:x1="38.551cm" svg:y1="31.359cm" svg:x2="40.432cm" svg:y2="43.928cm" draw:start-shape="id31" draw:start-glue-point="2" draw:end-shape="id86" draw:end-glue-point="0" svg:d="M38551 31359c0 9427 1881 3143 1881 12569" svg:viewBox="0 0 1882 12570">
          <text:p/>
        </draw:connector>
        <draw:connector draw:style-name="gr3" draw:text-style-name="P3" draw:layer="layout" draw:type="curve" svg:x1="38.551cm" svg:y1="31.359cm" svg:x2="42.748cm" svg:y2="41.527cm" draw:start-shape="id31" draw:start-glue-point="2" draw:end-shape="id87" draw:end-glue-point="0" svg:d="M38551 31359c0 7626 4197 2542 4197 10168" svg:viewBox="0 0 4198 10169">
          <text:p/>
        </draw:connector>
        <draw:connector draw:style-name="gr3" draw:text-style-name="P3" draw:layer="layout" draw:type="curve" svg:x1="38.551cm" svg:y1="31.359cm" svg:x2="44.874cm" svg:y2="43.928cm" draw:start-shape="id31" draw:start-glue-point="2" draw:end-shape="id88" draw:end-glue-point="0" svg:d="M38551 31359c0 9427 6323 3143 6323 12569" svg:viewBox="0 0 6324 12570">
          <text:p/>
        </draw:connector>
        <draw:connector draw:style-name="gr34" draw:text-style-name="P3" draw:layer="layout" draw:type="curve" svg:x1="38.551cm" svg:y1="31.359cm" svg:x2="52.494cm" svg:y2="43.927cm" draw:start-shape="id31" draw:start-glue-point="2" draw:end-shape="id89" draw:end-glue-point="0" svg:d="M38551 31359c0 9426 13943 3142 13943 12568" svg:viewBox="0 0 13944 12569">
          <text:p/>
        </draw:connector>
        <draw:connector draw:style-name="gr35" draw:text-style-name="P3" draw:layer="layout" draw:type="curve" svg:x1="38.551cm" svg:y1="31.359cm" svg:x2="54.42cm" svg:y2="41.705cm" draw:start-shape="id31" draw:start-glue-point="2" draw:end-shape="id90" draw:end-glue-point="0" svg:d="M38551 31359c0 7759 15869 2587 15869 10346" svg:viewBox="0 0 15870 10347">
          <text:p/>
        </draw:connector>
        <draw:connector draw:style-name="gr3" draw:text-style-name="P3" draw:layer="layout" draw:type="curve" svg:x1="58.245cm" svg:y1="27.423cm" svg:x2="51.598cm" svg:y2="29.255cm" draw:start-shape="id46" draw:start-glue-point="2" draw:end-shape="id91" draw:end-glue-point="0" svg:d="M58245 27423c0 1375-6647 460-6647 1832" svg:viewBox="0 0 6648 1833">
          <text:p/>
        </draw:connector>
        <draw:connector draw:style-name="gr3" draw:text-style-name="P3" draw:layer="layout" draw:type="curve" svg:x1="58.245cm" svg:y1="27.423cm" svg:x2="54.959cm" svg:y2="29.255cm" draw:start-shape="id46" draw:start-glue-point="2" draw:end-shape="id92" draw:end-glue-point="0" svg:d="M58245 27423c0 1374-3286 458-3286 1832" svg:viewBox="0 0 3287 1833">
          <text:p/>
        </draw:connector>
        <draw:connector draw:style-name="gr3" draw:text-style-name="P3" draw:layer="layout" draw:type="curve" svg:x1="58.245cm" svg:y1="27.423cm" svg:x2="58.266cm" svg:y2="29.255cm" draw:start-shape="id46" draw:start-glue-point="2" draw:end-shape="id80" draw:end-glue-point="0" svg:d="M58245 27423c0 1375 21 460 21 1832" svg:viewBox="0 0 22 1833">
          <text:p/>
        </draw:connector>
        <draw:connector draw:style-name="gr3" draw:text-style-name="P3" draw:layer="layout" draw:type="curve" svg:x1="58.245cm" svg:y1="27.423cm" svg:x2="61.602cm" svg:y2="29.256cm" draw:start-shape="id46" draw:start-glue-point="2" draw:end-shape="id93" draw:end-glue-point="0" svg:d="M58245 27423c0 1375 3357 459 3357 1833" svg:viewBox="0 0 3358 1834">
          <text:p/>
        </draw:connector>
        <draw:connector draw:style-name="gr3" draw:text-style-name="P3" draw:layer="layout" draw:type="curve" svg:x1="32.048cm" svg:y1="30.863cm" svg:x2="13.389cm" svg:y2="42.735cm" draw:start-shape="id67" draw:start-glue-point="2" draw:end-shape="id94" draw:end-glue-point="0" svg:d="M32048 30863c0 8905-18659 2970-18659 11872" svg:viewBox="0 0 18660 11873">
          <text:p/>
        </draw:connector>
        <draw:connector draw:style-name="gr3" draw:text-style-name="P3" draw:layer="layout" draw:type="curve" svg:x1="32.048cm" svg:y1="30.863cm" svg:x2="20.102cm" svg:y2="42.736cm" draw:start-shape="id67" draw:start-glue-point="2" draw:end-shape="id95" draw:end-glue-point="0" svg:d="M32048 30863c0 8905-11946 2969-11946 11873" svg:viewBox="0 0 11947 11874">
          <text:p/>
        </draw:connector>
        <draw:connector draw:style-name="gr3" draw:text-style-name="P3" draw:layer="layout" draw:type="curve" svg:x1="32.048cm" svg:y1="30.863cm" svg:x2="23.444cm" svg:y2="42.737cm" draw:start-shape="id67" draw:start-glue-point="2" draw:end-shape="id96" draw:end-glue-point="0" svg:d="M32048 30863c0 8907-8604 2970-8604 11874" svg:viewBox="0 0 8605 11875">
          <text:p/>
        </draw:connector>
        <draw:connector draw:style-name="gr3" draw:text-style-name="P3" draw:layer="layout" draw:type="curve" svg:x1="38.551cm" svg:y1="31.359cm" svg:x2="46.782cm" svg:y2="41.705cm" draw:start-shape="id31" draw:start-glue-point="2" draw:end-shape="id97" draw:end-glue-point="0" svg:d="M38551 31359c0 7759 8231 2587 8231 10346" svg:viewBox="0 0 8232 10347">
          <text:p/>
        </draw:connector>
        <draw:connector draw:style-name="gr3" draw:text-style-name="P3" draw:layer="layout" draw:type="curve" svg:x1="38.551cm" svg:y1="31.359cm" svg:x2="48.684cm" svg:y2="43.927cm" draw:start-shape="id31" draw:start-glue-point="2" draw:end-shape="id98" draw:end-glue-point="0" svg:d="M38551 31359c0 9426 10133 3142 10133 12568" svg:viewBox="0 0 10134 12569">
          <text:p/>
        </draw:connector>
        <draw:connector draw:style-name="gr34" draw:text-style-name="P3" draw:layer="layout" draw:type="curve" svg:x1="38.551cm" svg:y1="31.359cm" svg:x2="50.596cm" svg:y2="41.718cm" draw:start-shape="id31" draw:start-glue-point="2" draw:end-shape="id99" draw:end-glue-point="0" svg:d="M38551 31359c0 7768 12045 2589 12045 10359" svg:viewBox="0 0 12046 10360">
          <text:p/>
        </draw:connector>
        <draw:connector draw:style-name="gr3" draw:text-style-name="P3" draw:layer="layout" draw:type="curve" svg:x1="32.048cm" svg:y1="30.863cm" svg:x2="16.726cm" svg:y2="42.735cm" draw:start-shape="id67" draw:start-glue-point="2" draw:end-shape="id100" draw:end-glue-point="0" svg:d="M32048 30863c0 8905-15322 2970-15322 11872" svg:viewBox="0 0 15323 11873">
          <text:p/>
        </draw:connector>
        <draw:connector draw:style-name="gr3" draw:text-style-name="P3" draw:layer="layout" draw:type="curve" svg:x1="32.048cm" svg:y1="30.863cm" svg:x2="26.698cm" svg:y2="42.738cm" draw:start-shape="id67" draw:start-glue-point="2" draw:end-shape="id101" draw:end-glue-point="0" svg:d="M32048 30863c0 8907-5350 2970-5350 11875" svg:viewBox="0 0 5351 11876">
          <text:p/>
        </draw:connector>
        <draw:connector draw:style-name="gr3" draw:text-style-name="P3" draw:layer="layout" draw:type="curve" svg:x1="32.048cm" svg:y1="30.863cm" svg:x2="30.206cm" svg:y2="42.739cm" draw:start-shape="id67" draw:start-glue-point="2" draw:end-shape="id102" draw:end-glue-point="0" svg:d="M32048 30863c0 8908-1842 2971-1842 11876" svg:viewBox="0 0 1843 11877">
          <text:p/>
        </draw:connector>
        <draw:connector draw:style-name="gr3" draw:text-style-name="P3" draw:layer="layout" draw:type="curve" svg:x1="58.245cm" svg:y1="27.423cm" svg:x2="65.119cm" svg:y2="29.239cm" draw:start-shape="id46" draw:start-glue-point="2" draw:end-shape="id78" draw:end-glue-point="0" svg:d="M58245 27423c0 1362 6874 454 6874 1816" svg:viewBox="0 0 6875 1817">
          <text:p/>
        </draw:connector>
        <draw:connector draw:style-name="gr34" draw:text-style-name="P3" draw:layer="layout" draw:type="curve" svg:x1="65.119cm" svg:y1="31.092cm" svg:x2="61.937cm" svg:y2="34.608cm" draw:start-shape="id78" draw:start-glue-point="2" draw:end-shape="id103" draw:end-glue-point="0" svg:d="M65119 31092c0 2637-3182 879-3182 3516" svg:viewBox="0 0 3183 3517">
          <text:p/>
        </draw:connector>
        <draw:connector draw:style-name="gr3" draw:text-style-name="P3" draw:layer="layout" draw:type="curve" svg:x1="65.119cm" svg:y1="31.092cm" svg:x2="65.14cm" svg:y2="34.609cm" draw:start-shape="id78" draw:start-glue-point="2" draw:end-shape="id104" draw:end-glue-point="0" svg:d="M65119 31092c0 2638 21 880 21 3517" svg:viewBox="0 0 22 3518">
          <text:p/>
        </draw:connector>
        <draw:custom-shape draw:style-name="gr18" draw:text-style-name="P2" xml:id="id33" draw:id="id33" draw:layer="layout" svg:width="2.854cm" svg:height="1.588cm" svg:x="35.195cm" svg:y="43.927cm">
          <text:p text:style-name="P1"><text:span text:style-name="T1">Heth</text:span></text:p>
          <text:p text:style-name="P1"><text:span text:style-name="T13">1Ch 1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2" xml:id="id32" draw:id="id32" draw:layer="layout" svg:width="2.845cm" svg:height="2.083cm" svg:x="33.308cm" svg:y="41.426cm">
          <text:p text:style-name="P1"><text:span text:style-name="T1">Zidon</text:span></text:p>
          <text:p text:style-name="P1"><text:span text:style-name="T13">1Ch 1:13</text:span></text:p>
          <text:p text:style-name="P1"><text:span text:style-name="T1">Sidon</text:span></text:p>
          <text:p text:style-name="P1"><text:span text:style-name="T13">Gen 10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2" xml:id="id34" draw:id="id34" draw:layer="layout" svg:width="2.896cm" svg:height="2.184cm" svg:x="37.097cm" svg:y="41.388cm">
          <text:p text:style-name="P1"><text:span text:style-name="T1">Jebusite(s)</text:span></text:p>
          <text:p text:style-name="P1"><text:span text:style-name="T13">1Ch 1:14</text:span></text:p>
          <text:p text:style-name="P1"><text:span text:style-name="T1">Jebusi</text:span></text:p>
          <text:p text:style-name="P1"><text:span text:style-name="T13">Jos 18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6" draw:id="id86" draw:layer="layout" svg:width="2.854cm" svg:height="1.588cm" svg:x="39.005cm" svg:y="43.928cm">
          <text:p text:style-name="P1"><text:span text:style-name="T1">Amorite(s)</text:span></text:p>
          <text:p text:style-name="P1"><text:span text:style-name="T13">1Ch 1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2" xml:id="id87" draw:id="id87" draw:layer="layout" svg:width="3.302cm" svg:height="2.083cm" svg:x="41.097cm" svg:y="41.527cm">
          <text:p text:style-name="P1"><text:span text:style-name="T1">Girgashite(s)</text:span></text:p>
          <text:p text:style-name="P1"><text:span text:style-name="T13">1Ch 1:14</text:span></text:p>
          <text:p text:style-name="P1"><text:span text:style-name="T1">Girgasite</text:span></text:p>
          <text:p text:style-name="P1"><text:span text:style-name="T13">Gen 10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8" draw:id="id88" draw:layer="layout" svg:width="2.854cm" svg:height="1.588cm" svg:x="43.447cm" svg:y="43.928cm">
          <text:p text:style-name="P1"><text:span text:style-name="T1">Hivite(s)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7" draw:id="id97" draw:layer="layout" svg:width="2.854cm" svg:height="1.588cm" svg:x="45.355cm" svg:y="41.705cm">
          <text:p text:style-name="P1"><text:span text:style-name="T1">Arkite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8" draw:id="id98" draw:layer="layout" svg:width="2.854cm" svg:height="1.588cm" svg:x="47.257cm" svg:y="43.927cm">
          <text:p text:style-name="P1"><text:span text:style-name="T1">Sinite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2" xml:id="id99" draw:id="id99" draw:layer="layout" svg:width="2.845cm" svg:height="1.575cm" svg:x="49.174cm" svg:y="41.718cm">
          <text:p text:style-name="P1"><text:span text:style-name="T1">Arvad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9" draw:id="id89" draw:layer="layout" svg:width="2.854cm" svg:height="1.588cm" svg:x="51.067cm" svg:y="43.927cm">
          <text:p text:style-name="P1"><text:span text:style-name="T1">Zemar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" draw:text-style-name="P2" xml:id="id90" draw:id="id90" draw:layer="layout" svg:width="2.896cm" svg:height="1.653cm" svg:x="52.972cm" svg:y="41.705cm">
          <text:p text:style-name="P1"><text:span text:style-name="T1">Hamath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" draw:text-style-name="P2" xml:id="id92" draw:id="id92" draw:layer="layout" svg:width="3.099cm" svg:height="2.845cm" svg:x="53.41cm" svg:y="29.255cm">
          <text:p text:style-name="P1"><text:span text:style-name="T1">Asshur</text:span></text:p>
          <text:p text:style-name="P4"><text:span text:style-name="T13">1Ch 1:17</text:span></text:p>
          <text:p text:style-name="P1"><text:span text:style-name="T18">Assur</text:span></text:p>
          <text:p text:style-name="P1"><text:span text:style-name="T18">Assyrian(s)</text:span></text:p>
          <text:p text:style-name="P1"><text:span text:style-name="T18">Assy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91" draw:id="id91" draw:layer="layout" svg:width="2.854cm" svg:height="1.588cm" svg:x="50.171cm" svg:y="29.255cm">
          <text:p text:style-name="P1"><text:span text:style-name="T1">Elam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0" draw:id="id80" draw:layer="layout" svg:width="2.854cm" svg:height="1.588cm" svg:x="56.839cm" svg:y="29.255cm">
          <text:p text:style-name="P1"><text:span text:style-name="T1">Arphaxad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93" draw:id="id93" draw:layer="layout" svg:width="2.845cm" svg:height="2.032cm" svg:x="60.18cm" svg:y="29.256cm">
          <text:p text:style-name="P1"><text:span text:style-name="T1">Lud</text:span></text:p>
          <text:p text:style-name="P4"><text:span text:style-name="T13">1Ch 1:17</text:span></text:p>
          <text:p text:style-name="P4"><text:span text:style-name="T1">Lydia</text:span></text:p>
          <text:p text:style-name="P4"><text:span text:style-name="T13">Eze 30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" draw:text-style-name="P2" xml:id="id78" draw:id="id78" draw:layer="layout" svg:width="3.34cm" svg:height="1.853cm" svg:x="63.449cm" svg:y="29.239cm">
          <text:p text:style-name="P1"><text:span text:style-name="T1">Aram</text:span></text:p>
          <text:p text:style-name="P1"><text:span text:style-name="T13">1Ch 1:17</text:span></text:p>
          <text:p text:style-name="P1"><text:span text:style-name="T13">Gen 10:22-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3" draw:id="id103" draw:layer="layout" svg:width="2.854cm" svg:height="1.588cm" svg:x="60.51cm" svg:y="34.608cm">
          <text:p text:style-name="P1"><text:span text:style-name="T1">Uz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4" draw:id="id104" draw:layer="layout" svg:width="2.854cm" svg:height="1.588cm" svg:x="63.713cm" svg:y="34.609cm">
          <text:p text:style-name="P1"><text:span text:style-name="T1">Hul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9" draw:id="id79" draw:layer="layout" svg:width="2.854cm" svg:height="1.588cm" svg:x="66.969cm" svg:y="34.607cm">
          <text:p text:style-name="P1"><text:span text:style-name="T1">Gether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" draw:text-style-name="P2" xml:id="id213" draw:id="id213" draw:layer="layout" svg:width="2.743cm" svg:height="1.676cm" svg:x="70.172cm" svg:y="34.608cm">
          <text:p text:style-name="P1"><text:span text:style-name="T1">Meshech</text:span></text:p>
          <text:p text:style-name="P1"><text:span text:style-name="T1">Mash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" draw:text-style-name="P2" xml:id="id72" draw:id="id72" draw:layer="layout" svg:width="2.845cm" svg:height="2.134cm" svg:x="56.844cm" svg:y="34.306cm">
          <text:p text:style-name="P1"><text:span text:style-name="T1">Shelah</text:span></text:p>
          <text:p text:style-name="P1"><text:span text:style-name="T13">1Ch 1:18</text:span></text:p>
          <text:p text:style-name="P1"><text:span text:style-name="T1">Salah</text:span></text:p>
          <text:p text:style-name="P1"><text:span text:style-name="T13">Gen 10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" draw:text-style-name="P2" xml:id="id73" draw:id="id73" draw:layer="layout" svg:width="2.845cm" svg:height="1.778cm" svg:x="56.85cm" svg:y="38.423cm">
          <text:p text:style-name="P1"><text:span text:style-name="T1">Eber</text:span></text:p>
          <text:p text:style-name="P1"><text:span text:style-name="T13">1Ch 1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4" draw:id="id74" draw:layer="layout" svg:width="2.854cm" svg:height="1.588cm" svg:x="56.851cm" svg:y="42.351cm">
          <text:p text:style-name="P1"><text:span text:style-name="T1">Peleg</text:span></text:p>
          <text:p text:style-name="P1"><text:span text:style-name="T13">1Ch 1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5" draw:id="id75" draw:layer="layout" svg:width="2.854cm" svg:height="1.588cm" svg:x="60.252cm" svg:y="42.352cm">
          <text:p text:style-name="P1"><text:span text:style-name="T1">Joktan</text:span></text:p>
          <text:p text:style-name="P1"><text:span text:style-name="T13">1Ch 1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6" draw:id="id106" draw:layer="layout" svg:width="2.854cm" svg:height="1.588cm" svg:x="63.554cm" svg:y="46.708cm">
          <text:p text:style-name="P1"><text:span text:style-name="T1">Shelep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5" draw:id="id105" draw:layer="layout" svg:width="2.854cm" svg:height="1.588cm" svg:x="60.283cm" svg:y="46.708cm">
          <text:p text:style-name="P1"><text:span text:style-name="T1">Almodad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" draw:text-style-name="P2" xml:id="id107" draw:id="id107" draw:layer="layout" svg:width="3.429cm" svg:height="1.588cm" svg:x="66.707cm" svg:y="46.708cm">
          <text:p text:style-name="P1"><text:span text:style-name="T1">Hazarmavet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8" draw:id="id108" draw:layer="layout" svg:width="2.854cm" svg:height="1.588cm" svg:x="70.481cm" svg:y="46.709cm">
          <text:p text:style-name="P1"><text:span text:style-name="T1">Jera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9" draw:id="id109" draw:layer="layout" svg:width="2.854cm" svg:height="1.588cm" svg:x="73.765cm" svg:y="46.71cm">
          <text:p text:style-name="P1"><text:span text:style-name="T1">Hadoram</text:span></text:p>
          <text:p text:style-name="P1"><text:span text:style-name="T13">1Ch 1: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0" draw:id="id110" draw:layer="layout" svg:width="2.854cm" svg:height="1.588cm" svg:x="77.066cm" svg:y="46.711cm">
          <text:p text:style-name="P1"><text:span text:style-name="T1">Uzal</text:span></text:p>
          <text:p text:style-name="P1"><text:span text:style-name="T13">1Ch 1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7" draw:id="id77" draw:layer="layout" svg:width="2.854cm" svg:height="1.588cm" svg:x="80.467cm" svg:y="46.712cm">
          <text:p text:style-name="P1"><text:span text:style-name="T1">Diklah</text:span></text:p>
          <text:p text:style-name="P1"><text:span text:style-name="T13">1Ch 1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6" draw:id="id76" draw:layer="layout" svg:width="2.854cm" svg:height="1.588cm" svg:x="83.922cm" svg:y="46.71cm">
          <text:p text:style-name="P1"><text:span text:style-name="T1">Ebal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5" draw:id="id85" draw:layer="layout" svg:width="2.854cm" svg:height="1.588cm" svg:x="87.414cm" svg:y="46.711cm">
          <text:p text:style-name="P1"><text:span text:style-name="T1">Abimael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1" draw:id="id111" draw:layer="layout" svg:width="2.854cm" svg:height="1.588cm" svg:x="90.767cm" svg:y="46.712cm">
          <text:p text:style-name="P1"><text:span text:style-name="T1">Sheba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2" draw:id="id112" draw:layer="layout" svg:width="2.854cm" svg:height="1.588cm" svg:x="94.168cm" svg:y="46.713cm">
          <text:p text:style-name="P1"><text:span text:style-name="T1">Ophir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3" draw:id="id113" draw:layer="layout" svg:width="2.854cm" svg:height="1.588cm" svg:x="97.469cm" svg:y="46.714cm">
          <text:p text:style-name="P1"><text:span text:style-name="T1">Havilah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4" draw:id="id114" draw:layer="layout" svg:width="2.854cm" svg:height="1.588cm" svg:x="100.869cm" svg:y="46.714cm">
          <text:p text:style-name="P1"><text:span text:style-name="T1">Jobab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79cm" svg:y1="43.94cm" svg:x2="61.71cm" svg:y2="46.708cm" draw:start-shape="id75" draw:start-glue-point="2" draw:end-shape="id105" draw:end-glue-point="0" svg:d="M61679 43940c0 2077 31 694 31 2768" svg:viewBox="0 0 32 2769">
          <text:p/>
        </draw:connector>
        <draw:connector draw:style-name="gr3" draw:text-style-name="P3" draw:layer="layout" draw:type="curve" svg:x1="61.679cm" svg:y1="43.94cm" svg:x2="64.981cm" svg:y2="46.708cm" draw:start-shape="id75" draw:start-glue-point="2" draw:end-shape="id106" draw:end-glue-point="0" svg:d="M61679 43940c0 2077 3302 694 3302 2768" svg:viewBox="0 0 3303 2769">
          <text:p/>
        </draw:connector>
        <draw:connector draw:style-name="gr3" draw:text-style-name="P3" draw:layer="layout" draw:type="curve" svg:x1="61.679cm" svg:y1="43.94cm" svg:x2="68.421cm" svg:y2="46.708cm" draw:start-shape="id75" draw:start-glue-point="2" draw:end-shape="id107" draw:end-glue-point="0" svg:d="M61679 43940c0 2077 6742 694 6742 2768" svg:viewBox="0 0 6743 2769">
          <text:p/>
        </draw:connector>
        <draw:connector draw:style-name="gr3" draw:text-style-name="P3" draw:layer="layout" draw:type="curve" svg:x1="61.679cm" svg:y1="43.94cm" svg:x2="71.908cm" svg:y2="46.709cm" draw:start-shape="id75" draw:start-glue-point="2" draw:end-shape="id108" draw:end-glue-point="0" svg:d="M61679 43940c0 2077 10229 693 10229 2769" svg:viewBox="0 0 10230 2770">
          <text:p/>
        </draw:connector>
        <draw:connector draw:style-name="gr3" draw:text-style-name="P3" draw:layer="layout" draw:type="curve" svg:x1="61.679cm" svg:y1="43.94cm" svg:x2="75.192cm" svg:y2="46.71cm" draw:start-shape="id75" draw:start-glue-point="2" draw:end-shape="id109" draw:end-glue-point="0" svg:d="M61679 43940c0 2079 13513 694 13513 2770" svg:viewBox="0 0 13514 2771">
          <text:p/>
        </draw:connector>
        <draw:connector draw:style-name="gr3" draw:text-style-name="P3" draw:layer="layout" draw:type="curve" svg:x1="61.679cm" svg:y1="43.94cm" svg:x2="78.493cm" svg:y2="46.711cm" draw:start-shape="id75" draw:start-glue-point="2" draw:end-shape="id110" draw:end-glue-point="0" svg:d="M61679 43940c0 2079 16814 694 16814 2771" svg:viewBox="0 0 16815 2772">
          <text:p/>
        </draw:connector>
        <draw:connector draw:style-name="gr3" draw:text-style-name="P3" draw:layer="layout" draw:type="curve" svg:x1="61.679cm" svg:y1="43.94cm" svg:x2="92.194cm" svg:y2="46.712cm" draw:start-shape="id75" draw:start-glue-point="2" draw:end-shape="id111" draw:end-glue-point="0" svg:d="M61679 43940c0 2080 30515 695 30515 2772" svg:viewBox="0 0 30516 2773">
          <text:p/>
        </draw:connector>
        <draw:connector draw:style-name="gr3" draw:text-style-name="P3" draw:layer="layout" draw:type="curve" svg:x1="61.679cm" svg:y1="43.94cm" svg:x2="95.595cm" svg:y2="46.713cm" draw:start-shape="id75" draw:start-glue-point="2" draw:end-shape="id112" draw:end-glue-point="0" svg:d="M61679 43940c0 2080 33916 694 33916 2773" svg:viewBox="0 0 33917 2774">
          <text:p/>
        </draw:connector>
        <draw:connector draw:style-name="gr3" draw:text-style-name="P3" draw:layer="layout" draw:type="curve" svg:x1="61.679cm" svg:y1="43.94cm" svg:x2="98.896cm" svg:y2="46.714cm" draw:start-shape="id75" draw:start-glue-point="2" draw:end-shape="id113" draw:end-glue-point="0" svg:d="M61679 43940c0 2082 37217 695 37217 2774" svg:viewBox="0 0 37218 2775">
          <text:p/>
        </draw:connector>
        <draw:connector draw:style-name="gr3" draw:text-style-name="P3" draw:layer="layout" draw:type="curve" svg:x1="61.679cm" svg:y1="43.94cm" svg:x2="102.296cm" svg:y2="46.714cm" draw:start-shape="id75" draw:start-glue-point="2" draw:end-shape="id114" draw:end-glue-point="0" svg:d="M61679 43940c0 2082 40617 695 40617 2774" svg:viewBox="0 0 40618 2775">
          <text:p/>
        </draw:connector>
        <draw:connector draw:style-name="gr3" draw:text-style-name="P3" draw:layer="layout" draw:type="curve" svg:x1="58.278cm" svg:y1="43.939cm" svg:x2="58.279cm" svg:y2="46.752cm" draw:start-shape="id74" draw:start-glue-point="2" draw:end-shape="id115" draw:end-glue-point="0" svg:d="M58278 43939c0 2110 1 704 1 2813" svg:viewBox="0 0 2 2814">
          <text:p/>
        </draw:connector>
        <draw:connector draw:style-name="gr3" draw:text-style-name="P3" draw:layer="layout" draw:type="curve" svg:x1="61.626cm" svg:y1="60.709cm" svg:x2="79.293cm" svg:y2="62.267cm" draw:start-shape="id81" draw:start-glue-point="2" draw:end-shape="id116" draw:end-glue-point="0" svg:d="M61626 60709c0 1170 17667 391 17667 1558" svg:viewBox="0 0 17668 1559">
          <text:p/>
        </draw:connector>
        <draw:custom-shape draw:style-name="gr18" draw:text-style-name="P2" xml:id="id115" draw:id="id115" draw:layer="layout" svg:width="2.854cm" svg:height="1.588cm" svg:x="56.852cm" svg:y="46.752cm">
          <text:p text:style-name="P1"><text:span text:style-name="T1">Reu</text:span></text:p>
          <text:p text:style-name="P1"><text:span text:style-name="T13">1Ch 1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7" draw:id="id117" draw:layer="layout" svg:width="2.854cm" svg:height="1.588cm" svg:x="56.853cm" svg:y="48.753cm">
          <text:p text:style-name="P1"><text:span text:style-name="T1">Serug</text:span></text:p>
          <text:p text:style-name="P1"><text:span text:style-name="T13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8" draw:id="id118" draw:layer="layout" svg:width="2.854cm" svg:height="1.588cm" svg:x="56.853cm" svg:y="50.853cm">
          <text:p text:style-name="P1"><text:span text:style-name="T1">Nahor</text:span></text:p>
          <text:p text:style-name="P1"><text:span text:style-name="T13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9" draw:id="id119" draw:layer="layout" svg:width="2.854cm" svg:height="1.588cm" svg:x="56.853cm" svg:y="52.957cm">
          <text:p text:style-name="P1"><text:span text:style-name="T1">Terah</text:span></text:p>
          <text:p text:style-name="P1"><text:span text:style-name="T18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0" draw:id="id120" draw:layer="layout" svg:width="2.854cm" svg:height="1.588cm" svg:x="56.853cm" svg:y="55.053cm">
          <text:p text:style-name="P1"><text:span text:style-name="T1">Abram</text:span></text:p>
          <text:p text:style-name="P1"><text:span text:style-name="T1">Abraham</text:span></text:p>
          <text:p text:style-name="P1"><text:span text:style-name="T13">1Ch 1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8cm" svg:y1="50.341cm" svg:x2="58.28cm" svg:y2="50.853cm" draw:start-shape="id117" draw:start-glue-point="2" draw:end-shape="id118" draw:end-glue-point="0" svg:d="M58280 50341v512" svg:viewBox="0 0 1 513">
          <text:p/>
        </draw:connector>
        <draw:connector draw:style-name="gr3" draw:text-style-name="P3" draw:layer="layout" draw:type="curve" svg:x1="58.28cm" svg:y1="52.441cm" svg:x2="58.28cm" svg:y2="52.957cm" draw:start-shape="id118" draw:start-glue-point="2" draw:end-shape="id119" draw:end-glue-point="0" svg:d="M58280 52441v516" svg:viewBox="0 0 1 517">
          <text:p/>
        </draw:connector>
        <draw:connector draw:style-name="gr3" draw:text-style-name="P3" draw:layer="layout" draw:type="curve" svg:x1="58.28cm" svg:y1="54.545cm" svg:x2="58.28cm" svg:y2="55.053cm" draw:start-shape="id119" draw:start-glue-point="2" draw:end-shape="id120" draw:end-glue-point="0" svg:d="M58280 54545v508" svg:viewBox="0 0 1 509">
          <text:p/>
        </draw:connector>
        <draw:connector draw:style-name="gr3" draw:text-style-name="P3" draw:layer="layout" draw:type="curve" svg:x1="58.279cm" svg:y1="48.34cm" svg:x2="58.28cm" svg:y2="48.753cm" draw:start-shape="id115" draw:start-glue-point="2" draw:end-shape="id117" draw:end-glue-point="0" svg:d="M58279 48340c0 310 1 104 1 413" svg:viewBox="0 0 2 414">
          <text:p/>
        </draw:connector>
        <draw:custom-shape draw:style-name="gr18" draw:text-style-name="P2" xml:id="id81" draw:id="id81" draw:layer="layout" svg:width="2.854cm" svg:height="1.588cm" svg:x="60.199cm" svg:y="59.121cm">
          <text:p text:style-name="P1"><text:span text:style-name="T1">Ishmael</text:span></text:p>
          <text:p text:style-name="P1"><text:span text:style-name="T13">1Ch 1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2" xml:id="id124" draw:id="id124" draw:layer="layout" svg:width="2.54cm" svg:height="1.588cm" svg:x="57.01cm" svg:y="59.121cm">
          <text:p text:style-name="P1"><text:span text:style-name="T1">Isaac</text:span></text:p>
          <text:p text:style-name="P1"><text:span text:style-name="T13">1Ch 1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draw:line-skew="0.362cm" svg:x1="60.302cm" svg:y1="55.845cm" svg:x2="61.626cm" svg:y2="59.121cm" draw:start-shape="id121" draw:start-glue-point="0" draw:end-shape="id81" draw:end-glue-point="0" svg:d="M60302 55845c0 3039 1324 1401 1324 3276" svg:viewBox="0 0 1325 3277">
          <text:p/>
        </draw:connector>
        <draw:connector draw:style-name="gr3" draw:text-style-name="P3" draw:layer="layout" draw:type="curve" svg:x1="61.626cm" svg:y1="60.709cm" svg:x2="72.518cm" svg:y2="62.266cm" draw:start-shape="id81" draw:start-glue-point="2" draw:end-shape="id122" draw:end-glue-point="0" svg:d="M61626 60709c0 1168 10892 390 10892 1557" svg:viewBox="0 0 10893 1558">
          <text:p/>
        </draw:connector>
        <draw:connector draw:style-name="gr3" draw:text-style-name="P3" draw:layer="layout" draw:type="curve" svg:x1="61.626cm" svg:y1="60.709cm" svg:x2="75.857cm" svg:y2="62.266cm" draw:start-shape="id81" draw:start-glue-point="2" draw:end-shape="id123" draw:end-glue-point="0" svg:d="M61626 60709c0 1168 14231 390 14231 1557" svg:viewBox="0 0 14232 1558">
          <text:p/>
        </draw:connector>
        <draw:connector draw:style-name="gr3" draw:text-style-name="P3" draw:layer="layout" draw:type="curve" svg:x1="58.28cm" svg:y1="56.641cm" svg:x2="58.28cm" svg:y2="59.121cm" draw:start-shape="id120" draw:start-glue-point="2" draw:end-shape="id124" draw:end-glue-point="0" svg:d="M58280 56641v2480" svg:viewBox="0 0 1 2481">
          <text:p/>
        </draw:connector>
        <draw:connector draw:style-name="gr3" draw:text-style-name="P3" draw:layer="layout" draw:type="curve" svg:x1="61.626cm" svg:y1="60.709cm" svg:x2="82.631cm" svg:y2="62.268cm" draw:start-shape="id81" draw:start-glue-point="2" draw:end-shape="id125" draw:end-glue-point="0" svg:d="M61626 60709c0 1170 21005 391 21005 1559" svg:viewBox="0 0 21006 1560">
          <text:p/>
        </draw:connector>
        <draw:connector draw:style-name="gr3" draw:text-style-name="P3" draw:layer="layout" draw:type="curve" svg:x1="61.626cm" svg:y1="60.709cm" svg:x2="85.953cm" svg:y2="62.269cm" draw:start-shape="id81" draw:start-glue-point="2" draw:end-shape="id126" draw:end-glue-point="0" svg:d="M61626 60709c0 1171 24327 392 24327 1560" svg:viewBox="0 0 24328 1561">
          <text:p/>
        </draw:connector>
        <draw:connector draw:style-name="gr3" draw:text-style-name="P3" draw:layer="layout" draw:type="curve" svg:x1="61.626cm" svg:y1="60.709cm" svg:x2="89.319cm" svg:y2="62.27cm" draw:start-shape="id81" draw:start-glue-point="2" draw:end-shape="id127" draw:end-glue-point="0" svg:d="M61626 60709c0 1171 27693 391 27693 1561" svg:viewBox="0 0 27694 1562">
          <text:p/>
        </draw:connector>
        <draw:connector draw:style-name="gr3" draw:text-style-name="P3" draw:layer="layout" draw:type="curve" svg:x1="61.626cm" svg:y1="60.709cm" svg:x2="65.937cm" svg:y2="62.266cm" draw:start-shape="id81" draw:start-glue-point="2" draw:end-shape="id128" draw:end-glue-point="0" svg:d="M61626 60709c0 1168 4311 390 4311 1557" svg:viewBox="0 0 4312 1558">
          <text:p/>
        </draw:connector>
        <draw:custom-shape draw:style-name="gr18" draw:text-style-name="P2" xml:id="id122" draw:id="id122" draw:layer="layout" svg:width="2.854cm" svg:height="1.588cm" svg:x="71.091cm" svg:y="62.266cm">
          <text:p text:style-name="P1"><text:span text:style-name="T1">Kedar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" xml:id="id128" draw:id="id128" draw:layer="layout" svg:width="2.854cm" svg:height="2.032cm" svg:x="64.51cm" svg:y="62.266cm">
          <text:p text:style-name="P1"><text:span text:style-name="T1">Nebaioth</text:span></text:p>
          <text:p text:style-name="P1"><text:span text:style-name="T13">1Ch 1:29</text:span></text:p>
          <text:p text:style-name="P1"><text:span text:style-name="T1">Nebajoth</text:span></text:p>
          <text:p text:style-name="P1"><text:span text:style-name="T13">Gen 25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23" draw:id="id123" draw:layer="layout" svg:width="3.174cm" svg:height="1.588cm" svg:x="74.27cm" svg:y="62.266cm">
          <text:p text:style-name="P1"><text:span text:style-name="T1">Adbeel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6" draw:id="id116" draw:layer="layout" svg:width="2.854cm" svg:height="1.588cm" svg:x="77.866cm" svg:y="62.267cm">
          <text:p text:style-name="P1"><text:span text:style-name="T1">Mibsam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5" draw:id="id125" draw:layer="layout" svg:width="2.854cm" svg:height="1.588cm" svg:x="81.204cm" svg:y="62.268cm">
          <text:p text:style-name="P1"><text:span text:style-name="T1">Mishm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6" draw:id="id126" draw:layer="layout" svg:width="2.854cm" svg:height="1.588cm" svg:x="84.526cm" svg:y="62.269cm">
          <text:p text:style-name="P1"><text:span text:style-name="T1">Dumah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7" draw:id="id127" draw:layer="layout" svg:width="2.854cm" svg:height="1.588cm" svg:x="87.892cm" svg:y="62.27cm">
          <text:p text:style-name="P1"><text:span text:style-name="T1">Mass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82" draw:id="id82" draw:layer="layout" svg:width="2.845cm" svg:height="2.032cm" svg:x="91.36cm" svg:y="62.268cm">
          <text:p text:style-name="P1"><text:span text:style-name="T1">Hadad</text:span></text:p>
          <text:p text:style-name="P4"><text:span text:style-name="T13">1Ch 1:30</text:span></text:p>
          <text:p text:style-name="P1"><text:span text:style-name="T1">Hadar</text:span></text:p>
          <text:p text:style-name="P1"><text:span text:style-name="T13">Gen 25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3" draw:id="id83" draw:layer="layout" svg:width="2.854cm" svg:height="1.588cm" svg:x="94.761cm" svg:y="62.269cm">
          <text:p text:style-name="P1"><text:span text:style-name="T1">Tem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4" draw:id="id84" draw:layer="layout" svg:width="2.854cm" svg:height="1.588cm" svg:x="98.179cm" svg:y="62.27cm">
          <text:p text:style-name="P1"><text:span text:style-name="T1">Jetur</text:span></text:p>
          <text:p text:style-name="P1"><text:span text:style-name="T13">1Ch 1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135" draw:id="id135" draw:layer="layout" svg:width="2.845cm" svg:height="2.032cm" svg:x="101.632cm" svg:y="62.271cm">
          <text:p text:style-name="P1"><text:span text:style-name="T1">Naphish</text:span></text:p>
          <text:p text:style-name="P4"><text:span text:style-name="T13">1Ch 1:31</text:span></text:p>
          <text:p text:style-name="P1"><text:span text:style-name="T1">Nephish</text:span></text:p>
          <text:p text:style-name="P1"><text:span text:style-name="T13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36" draw:id="id136" draw:layer="layout" svg:width="2.854cm" svg:height="1.588cm" svg:x="108.05cm" svg:y="62.272cm">
          <text:p text:style-name="P1"><text:span text:style-name="T1">Kedemah</text:span></text:p>
          <text:p text:style-name="P1"><text:span text:style-name="T13">1Ch 1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draw:line-skew="0.773cm" svg:x1="56.211cm" svg:y1="55.854cm" svg:x2="51.891cm" svg:y2="59.168cm" draw:start-shape="id129" draw:start-glue-point="0" draw:end-shape="id130" draw:end-glue-point="0" svg:d="M56211 55854c0 3687-4320 2030-4320 3314" svg:viewBox="0 0 4321 3315">
          <text:p/>
        </draw:connector>
        <draw:connector draw:style-name="gr3" draw:text-style-name="P3" draw:layer="layout" draw:type="curve" draw:line-skew="0.772cm" svg:x1="56.211cm" svg:y1="55.854cm" svg:x2="54.719cm" svg:y2="59.169cm" draw:start-shape="id129" draw:start-glue-point="0" draw:end-shape="id131" draw:end-glue-point="0" svg:d="M56211 55854c0 3687-1492 2030-1492 3315" svg:viewBox="0 0 1493 3316">
          <text:p/>
        </draw:connector>
        <draw:connector draw:style-name="gr3" draw:text-style-name="P3" draw:layer="layout" draw:type="curve" svg:x1="42.775cm" svg:y1="60.754cm" svg:x2="34.485cm" svg:y2="62.235cm" draw:start-shape="id132" draw:start-glue-point="2" draw:end-shape="id133" draw:end-glue-point="0" svg:d="M42775 60754c0 1111-8290 371-8290 1481" svg:viewBox="0 0 8291 1482">
          <text:p/>
        </draw:connector>
        <draw:connector draw:style-name="gr3" draw:text-style-name="P3" draw:layer="layout" draw:type="curve" draw:line-skew="0.456cm" svg:x1="56.211cm" svg:y1="55.854cm" svg:x2="39.974cm" svg:y2="59.166cm" draw:start-shape="id129" draw:start-glue-point="0" draw:end-shape="id134" draw:end-glue-point="0" svg:d="M56211 55854c0 3210-16237 1554-16237 3312" svg:viewBox="0 0 16238 3313">
          <text:p/>
        </draw:connector>
        <draw:connector draw:style-name="gr3" draw:text-style-name="P3" draw:layer="layout" draw:type="curve" svg:x1="61.626cm" svg:y1="60.709cm" svg:x2="103.054cm" svg:y2="62.271cm" draw:start-shape="id81" draw:start-glue-point="2" draw:end-shape="id135" draw:end-glue-point="0" svg:d="M61626 60709c0 1173 41428 392 41428 1562" svg:viewBox="0 0 41429 1563">
          <text:p/>
        </draw:connector>
        <draw:connector draw:style-name="gr3" draw:text-style-name="P3" draw:layer="layout" draw:type="curve" svg:x1="61.626cm" svg:y1="60.709cm" svg:x2="109.477cm" svg:y2="62.272cm" draw:start-shape="id81" draw:start-glue-point="2" draw:end-shape="id136" draw:end-glue-point="0" svg:d="M61626 60709c0 1173 47851 392 47851 1563" svg:viewBox="0 0 47852 1564">
          <text:p/>
        </draw:connector>
        <draw:connector draw:style-name="gr3" draw:text-style-name="P3" xml:id="id129" draw:id="id129" draw:layer="layout" draw:type="curve" svg:x1="56.853cm" svg:y1="55.847cm" svg:x2="55.568cm" svg:y2="55.861cm" draw:start-shape="id120" draw:start-glue-point="3" draw:end-shape="id137" draw:end-glue-point="1" svg:d="M56853 55847c-963 0-321 14-1285 14" svg:viewBox="0 0 1286 15">
          <text:p/>
        </draw:connector>
        <draw:custom-shape draw:style-name="gr49" draw:text-style-name="P10" xml:id="id137" draw:id="id137" draw:layer="layout" svg:width="2.571cm" svg:height="1.588cm" svg:x="52.997cm" svg:y="55.067cm">
          <text:p text:style-name="P1"><text:span text:style-name="T1">Keturah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2" xml:id="id132" draw:id="id132" draw:layer="layout" svg:width="2.438cm" svg:height="1.588cm" svg:x="41.556cm" svg:y="59.166cm">
          <text:p text:style-name="P1"><text:span text:style-name="T1">Joksh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" draw:text-style-name="P2" xml:id="id134" draw:id="id134" draw:layer="layout" svg:width="2.235cm" svg:height="1.588cm" svg:x="38.857cm" svg:y="59.166cm">
          <text:p text:style-name="P1"><text:span text:style-name="T1">Zimr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2" xml:id="id142" draw:id="id142" draw:layer="layout" svg:width="2.591cm" svg:height="1.588cm" svg:x="44.465cm" svg:y="59.166cm">
          <text:p text:style-name="P1"><text:span text:style-name="T1">Med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2" xml:id="id139" draw:id="id139" draw:layer="layout" svg:width="2.845cm" svg:height="1.93cm" svg:x="47.498cm" svg:y="59.167cm">
          <text:p text:style-name="P1"><text:span text:style-name="T1">Midian</text:span></text:p>
          <text:p text:style-name="P1"><text:span text:style-name="T13">1Ch 1:32</text:span></text:p>
          <text:p text:style-name="P4"><text:span text:style-name="T1">Midianites</text:span></text:p>
          <text:p text:style-name="P4"><text:span text:style-name="T13">Num 3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2" xml:id="id130" draw:id="id130" draw:layer="layout" svg:width="2.489cm" svg:height="1.588cm" svg:x="50.647cm" svg:y="59.168cm">
          <text:p text:style-name="P1"><text:span text:style-name="T1">Ishbak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2" xml:id="id131" draw:id="id131" draw:layer="layout" svg:width="2.438cm" svg:height="1.588cm" svg:x="53.5cm" svg:y="59.169cm">
          <text:p text:style-name="P1"><text:span text:style-name="T1">Shuah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42.775cm" svg:y1="60.754cm" svg:x2="37.76cm" svg:y2="62.235cm" draw:start-shape="id132" draw:start-glue-point="2" draw:end-shape="id138" draw:end-glue-point="0" svg:d="M42775 60754c0 1111-5015 371-5015 1481" svg:viewBox="0 0 5016 1482">
          <text:p/>
        </draw:connector>
        <draw:connector draw:style-name="gr3" draw:text-style-name="P3" draw:layer="layout" draw:type="curve" svg:x1="48.92cm" svg:y1="61.097cm" svg:x2="41.51cm" svg:y2="62.269cm" draw:start-shape="id139" draw:start-glue-point="2" draw:end-shape="id140" draw:end-glue-point="0" svg:d="M48920 61097c0 880-7410 295-7410 1172" svg:viewBox="0 0 7411 1173">
          <text:p/>
        </draw:connector>
        <draw:connector draw:style-name="gr3" draw:text-style-name="P3" draw:layer="layout" draw:type="curve" svg:x1="48.92cm" svg:y1="61.097cm" svg:x2="44.715cm" svg:y2="62.269cm" draw:start-shape="id139" draw:start-glue-point="2" draw:end-shape="id141" draw:end-glue-point="0" svg:d="M48920 61097c0 880-4205 295-4205 1172" svg:viewBox="0 0 4206 1173">
          <text:p/>
        </draw:connector>
        <draw:connector draw:style-name="gr3" draw:text-style-name="P3" draw:layer="layout" draw:type="curve" draw:line-skew="0.581cm" svg:x1="56.211cm" svg:y1="55.854cm" svg:x2="42.775cm" svg:y2="59.166cm" draw:start-shape="id129" draw:start-glue-point="0" draw:end-shape="id132" draw:end-glue-point="0" svg:d="M56211 55854c0 3397-13436 1742-13436 3312" svg:viewBox="0 0 13437 3313">
          <text:p/>
        </draw:connector>
        <draw:connector draw:style-name="gr3" draw:text-style-name="P3" draw:layer="layout" draw:type="curve" draw:line-skew="0.774cm" svg:x1="56.211cm" svg:y1="55.854cm" svg:x2="45.76cm" svg:y2="59.166cm" draw:start-shape="id129" draw:start-glue-point="0" draw:end-shape="id142" draw:end-glue-point="0" svg:d="M56211 55854c0 3687-10451 2031-10451 3312" svg:viewBox="0 0 10452 3313">
          <text:p/>
        </draw:connector>
        <draw:connector draw:style-name="gr3" draw:text-style-name="P3" draw:layer="layout" draw:type="curve" draw:line-skew="0.773cm" svg:x1="56.211cm" svg:y1="55.854cm" svg:x2="48.92cm" svg:y2="59.167cm" draw:start-shape="id129" draw:start-glue-point="0" draw:end-shape="id139" draw:end-glue-point="0" svg:d="M56211 55854c0 3687-7291 2031-7291 3313" svg:viewBox="0 0 7292 3314">
          <text:p/>
        </draw:connector>
        <draw:connector draw:style-name="gr3" draw:text-style-name="P3" draw:layer="layout" draw:type="curve" svg:x1="48.92cm" svg:y1="61.097cm" svg:x2="48.052cm" svg:y2="62.269cm" draw:start-shape="id139" draw:start-glue-point="2" draw:end-shape="id143" draw:end-glue-point="0" svg:d="M48920 61097c0 879-868 293-868 1172" svg:viewBox="0 0 869 1173">
          <text:p/>
        </draw:connector>
        <draw:connector draw:style-name="gr3" draw:text-style-name="P3" draw:layer="layout" draw:type="curve" svg:x1="48.92cm" svg:y1="61.097cm" svg:x2="51.349cm" svg:y2="62.27cm" draw:start-shape="id139" draw:start-glue-point="2" draw:end-shape="id144" draw:end-glue-point="0" svg:d="M48920 61097c0 880 2429 294 2429 1173" svg:viewBox="0 0 2430 1174">
          <text:p/>
        </draw:connector>
        <draw:connector draw:style-name="gr3" draw:text-style-name="P3" draw:layer="layout" draw:type="curve" svg:x1="48.92cm" svg:y1="61.097cm" svg:x2="54.502cm" svg:y2="62.271cm" draw:start-shape="id139" draw:start-glue-point="2" draw:end-shape="id145" draw:end-glue-point="0" svg:d="M48920 61097c0 882 5582 295 5582 1174" svg:viewBox="0 0 5583 1175">
          <text:p/>
        </draw:connector>
        <draw:connector draw:style-name="gr3" draw:text-style-name="P3" draw:layer="layout" draw:type="curve" svg:x1="58.28cm" svg:y1="67.927cm" svg:x2="58.302cm" svg:y2="71.396cm" draw:start-shape="id146" draw:start-glue-point="2" draw:end-shape="id147" draw:end-glue-point="0" svg:d="M58280 67927c0 2602 22 868 22 3469" svg:viewBox="0 0 23 3470">
          <text:p/>
        </draw:connector>
        <draw:custom-shape draw:style-name="gr18" draw:text-style-name="P2" xml:id="id138" draw:id="id138" draw:layer="layout" svg:width="2.854cm" svg:height="1.588cm" svg:x="36.333cm" svg:y="62.235cm">
          <text:p text:style-name="P1"><text:span text:style-name="T1">Ded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33" draw:id="id133" draw:layer="layout" svg:width="2.854cm" svg:height="1.588cm" svg:x="33.058cm" svg:y="62.235cm">
          <text:p text:style-name="P1"><text:span text:style-name="T1">Sheba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1" draw:id="id141" draw:layer="layout" svg:width="2.854cm" svg:height="1.588cm" svg:x="43.288cm" svg:y="62.269cm">
          <text:p text:style-name="P1"><text:span text:style-name="T1">Epher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0" draw:id="id140" draw:layer="layout" svg:width="2.854cm" svg:height="1.588cm" svg:x="40.083cm" svg:y="62.269cm">
          <text:p text:style-name="P1"><text:span text:style-name="T1">Ephah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2" xml:id="id143" draw:id="id143" draw:layer="layout" svg:width="3.175cm" svg:height="2.083cm" svg:x="46.465cm" svg:y="62.269cm">
          <text:p text:style-name="P1"><text:span text:style-name="T1">Henoch</text:span></text:p>
          <text:p text:style-name="P1"><text:span text:style-name="T13">1Ch 1:33</text:span></text:p>
          <text:p text:style-name="P1"><text:span text:style-name="T1">Hanoch</text:span></text:p>
          <text:p text:style-name="P1"><text:span text:style-name="T13">Gen 25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4" draw:id="id144" draw:layer="layout" svg:width="2.854cm" svg:height="1.588cm" svg:x="49.922cm" svg:y="62.27cm">
          <text:p text:style-name="P1"><text:span text:style-name="T1">Abida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5" draw:id="id145" draw:layer="layout" svg:width="2.854cm" svg:height="1.588cm" svg:x="53.075cm" svg:y="62.271cm">
          <text:p text:style-name="P1"><text:span text:style-name="T1">Eldaah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2" draw:id="id152" draw:layer="layout" svg:width="2.854cm" svg:height="1.588cm" svg:x="56.847cm" svg:y="62.256cm">
          <text:p text:style-name="P1"><text:span text:style-name="T1">Esau</text:span></text:p>
          <text:p text:style-name="P1"><text:span text:style-name="T13">1Ch 1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212" draw:id="id212" draw:layer="layout" svg:width="2.854cm" svg:height="1.588cm" svg:x="60.248cm" svg:y="62.257cm">
          <text:p text:style-name="P1"><text:span text:style-name="T1">Israel</text:span></text:p>
          <text:p text:style-name="P1"><text:span text:style-name="T13">1Ch 1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81cm" svg:y1="67.927cm" svg:x2="65.087cm" svg:y2="71.388cm" draw:start-shape="id148" draw:start-glue-point="2" draw:end-shape="id149" draw:end-glue-point="0" svg:d="M61681 67927c0 2596 3406 866 3406 3461" svg:viewBox="0 0 3407 3462">
          <text:p/>
        </draw:connector>
        <draw:connector draw:style-name="gr3" draw:text-style-name="P3" draw:layer="layout" draw:type="curve" svg:x1="61.681cm" svg:y1="67.927cm" svg:x2="61.686cm" svg:y2="71.387cm" draw:start-shape="id148" draw:start-glue-point="2" draw:end-shape="id150" draw:end-glue-point="0" svg:d="M61681 67927c0 2596 5 867 5 3460" svg:viewBox="0 0 6 3461">
          <text:p/>
        </draw:connector>
        <draw:connector draw:style-name="gr3" draw:text-style-name="P3" draw:layer="layout" draw:type="curve" svg:x1="58.28cm" svg:y1="67.927cm" svg:x2="54.949cm" svg:y2="71.395cm" draw:start-shape="id146" draw:start-glue-point="2" draw:end-shape="id151" draw:end-glue-point="0" svg:d="M58280 67927c0 2602-3331 869-3331 3468" svg:viewBox="0 0 3332 3469">
          <text:p/>
        </draw:connector>
        <draw:connector draw:style-name="gr3" draw:text-style-name="P3" draw:layer="layout" draw:type="curve" svg:x1="58.274cm" svg:y1="63.844cm" svg:x2="71.762cm" svg:y2="66.341cm" draw:start-shape="id152" draw:start-glue-point="2" draw:end-shape="id153" draw:end-glue-point="0" svg:d="M58274 63844c0 1873 13488 625 13488 2497" svg:viewBox="0 0 13489 2498">
          <text:p/>
        </draw:connector>
        <draw:connector draw:style-name="gr3" draw:text-style-name="P3" draw:layer="layout" draw:type="curve" svg:x1="58.28cm" svg:y1="60.709cm" svg:x2="58.274cm" svg:y2="62.256cm" draw:start-shape="id124" draw:start-glue-point="2" draw:end-shape="id152" draw:end-glue-point="0" svg:d="M58280 60709c0 1161-6 388-6 1547" svg:viewBox="0 0 7 1548">
          <text:p/>
        </draw:connector>
        <draw:connector draw:style-name="gr3" draw:text-style-name="P3" draw:layer="layout" draw:type="curve" svg:x1="58.28cm" svg:y1="67.927cm" svg:x2="51.58cm" svg:y2="71.396cm" draw:start-shape="id146" draw:start-glue-point="2" draw:end-shape="id154" draw:end-glue-point="0" svg:d="M58280 67927c0 2602-6700 868-6700 3469" svg:viewBox="0 0 6701 3470">
          <text:p/>
        </draw:connector>
        <draw:custom-shape draw:style-name="gr18" draw:text-style-name="P2" xml:id="id148" draw:id="id148" draw:layer="layout" svg:width="2.854cm" svg:height="1.588cm" svg:x="60.254cm" svg:y="66.339cm">
          <text:p text:style-name="P1"><text:span text:style-name="T1">Reuel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6" draw:id="id146" draw:layer="layout" svg:width="2.854cm" svg:height="1.588cm" svg:x="56.853cm" svg:y="66.339cm">
          <text:p text:style-name="P1"><text:span text:style-name="T1">Eliphaz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59" draw:id="id159" draw:layer="layout" svg:width="3.174cm" svg:height="1.588cm" svg:x="63.433cm" svg:y="66.339cm">
          <text:p text:style-name="P1"><text:span text:style-name="T1">Jeush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0" draw:id="id160" draw:layer="layout" svg:width="2.854cm" svg:height="1.588cm" svg:x="66.934cm" svg:y="66.34cm">
          <text:p text:style-name="P1"><text:span text:style-name="T1">Jaalam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3" draw:id="id153" draw:layer="layout" svg:width="2.854cm" svg:height="1.588cm" svg:x="70.335cm" svg:y="66.341cm">
          <text:p text:style-name="P1"><text:span text:style-name="T1">Korah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8cm" svg:y1="67.927cm" svg:x2="44.862cm" svg:y2="71.394cm" draw:start-shape="id146" draw:start-glue-point="2" draw:end-shape="id155" draw:end-glue-point="0" svg:d="M58280 67927c0 2601-13418 868-13418 3467" svg:viewBox="0 0 13419 3468">
          <text:p/>
        </draw:connector>
        <draw:connector draw:style-name="gr3" draw:text-style-name="P3" draw:layer="layout" draw:type="curve" svg:x1="58.28cm" svg:y1="67.927cm" svg:x2="41.451cm" svg:y2="71.394cm" draw:start-shape="id146" draw:start-glue-point="2" draw:end-shape="id156" draw:end-glue-point="0" svg:d="M58280 67927c0 2601-16829 868-16829 3467" svg:viewBox="0 0 16830 3468">
          <text:p/>
        </draw:connector>
        <draw:connector draw:style-name="gr3" draw:text-style-name="P3" draw:layer="layout" draw:type="curve" svg:x1="58.28cm" svg:y1="67.927cm" svg:x2="38.194cm" svg:y2="71.394cm" draw:start-shape="id146" draw:start-glue-point="2" draw:end-shape="id157" draw:end-glue-point="0" svg:d="M58280 67927c0 2601-20086 868-20086 3467" svg:viewBox="0 0 20087 3468">
          <text:p/>
        </draw:connector>
        <draw:connector draw:style-name="gr3" draw:text-style-name="P3" draw:layer="layout" draw:type="curve" svg:x1="58.28cm" svg:y1="67.927cm" svg:x2="48.275cm" svg:y2="71.395cm" draw:start-shape="id146" draw:start-glue-point="2" draw:end-shape="id158" draw:end-glue-point="0" svg:d="M58280 67927c0 2602-10005 869-10005 3468" svg:viewBox="0 0 10006 3469">
          <text:p/>
        </draw:connector>
        <draw:connector draw:style-name="gr3" draw:text-style-name="P3" draw:layer="layout" draw:type="curve" svg:x1="58.274cm" svg:y1="63.844cm" svg:x2="58.28cm" svg:y2="66.339cm" draw:start-shape="id152" draw:start-glue-point="2" draw:end-shape="id146" draw:end-glue-point="0" svg:d="M58274 63844c0 1872 6 625 6 2495" svg:viewBox="0 0 7 2496">
          <text:p/>
        </draw:connector>
        <draw:connector draw:style-name="gr3" draw:text-style-name="P3" draw:layer="layout" draw:type="curve" svg:x1="58.274cm" svg:y1="63.844cm" svg:x2="61.681cm" svg:y2="66.339cm" draw:start-shape="id152" draw:start-glue-point="2" draw:end-shape="id148" draw:end-glue-point="0" svg:d="M58274 63844c0 1872 3407 625 3407 2495" svg:viewBox="0 0 3408 2496">
          <text:p/>
        </draw:connector>
        <draw:connector draw:style-name="gr3" draw:text-style-name="P3" draw:layer="layout" draw:type="curve" svg:x1="58.274cm" svg:y1="63.844cm" svg:x2="65.02cm" svg:y2="66.339cm" draw:start-shape="id152" draw:start-glue-point="2" draw:end-shape="id159" draw:end-glue-point="0" svg:d="M58274 63844c0 1872 6746 625 6746 2495" svg:viewBox="0 0 6747 2496">
          <text:p/>
        </draw:connector>
        <draw:connector draw:style-name="gr3" draw:text-style-name="P3" draw:layer="layout" draw:type="curve" svg:x1="58.274cm" svg:y1="63.844cm" svg:x2="68.361cm" svg:y2="66.34cm" draw:start-shape="id152" draw:start-glue-point="2" draw:end-shape="id160" draw:end-glue-point="0" svg:d="M58274 63844c0 1873 10087 626 10087 2496" svg:viewBox="0 0 10088 2497">
          <text:p/>
        </draw:connector>
        <draw:connector draw:style-name="gr3" draw:text-style-name="P3" draw:layer="layout" draw:type="curve" svg:x1="61.681cm" svg:y1="67.927cm" svg:x2="68.576cm" svg:y2="71.387cm" draw:start-shape="id148" draw:start-glue-point="2" draw:end-shape="id161" draw:end-glue-point="0" svg:d="M61681 67927c0 2596 6895 867 6895 3460" svg:viewBox="0 0 6896 3461">
          <text:p/>
        </draw:connector>
        <draw:connector draw:style-name="gr3" draw:text-style-name="P3" draw:layer="layout" draw:type="curve" svg:x1="61.681cm" svg:y1="67.927cm" svg:x2="71.977cm" svg:y2="71.388cm" draw:start-shape="id148" draw:start-glue-point="2" draw:end-shape="id162" draw:end-glue-point="0" svg:d="M61681 67927c0 2596 10296 866 10296 3461" svg:viewBox="0 0 10297 3462">
          <text:p/>
        </draw:connector>
        <draw:custom-shape draw:style-name="gr18" draw:text-style-name="P2" xml:id="id156" draw:id="id156" draw:layer="layout" svg:width="2.854cm" svg:height="1.588cm" svg:x="40.024cm" svg:y="71.394cm">
          <text:p text:style-name="P1"><text:span text:style-name="T1">Omar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7" draw:id="id157" draw:layer="layout" svg:width="2.854cm" svg:height="1.588cm" svg:x="36.767cm" svg:y="71.394cm">
          <text:p text:style-name="P1"><text:span text:style-name="T1">Teman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55" draw:id="id155" draw:layer="layout" svg:width="3.174cm" svg:height="1.588cm" svg:x="43.275cm" svg:y="71.394cm">
          <text:p text:style-name="P1"><text:span text:style-name="T1">Zephi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8" draw:id="id158" draw:layer="layout" svg:width="2.854cm" svg:height="1.588cm" svg:x="46.848cm" svg:y="71.395cm">
          <text:p text:style-name="P1"><text:span text:style-name="T1">Gatam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4" draw:id="id154" draw:layer="layout" svg:width="2.854cm" svg:height="1.588cm" svg:x="50.153cm" svg:y="71.396cm">
          <text:p text:style-name="P1"><text:span text:style-name="T1">Kenaz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1" draw:id="id151" draw:layer="layout" svg:width="2.854cm" svg:height="1.588cm" svg:x="53.522cm" svg:y="71.395cm">
          <text:p text:style-name="P1"><text:span text:style-name="T1">Timna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7" draw:id="id147" draw:layer="layout" svg:width="2.854cm" svg:height="1.588cm" svg:x="56.875cm" svg:y="71.396cm">
          <text:p text:style-name="P1"><text:span text:style-name="T1">Amalek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0" draw:id="id150" draw:layer="layout" svg:width="2.854cm" svg:height="1.588cm" svg:x="60.259cm" svg:y="71.387cm">
          <text:p text:style-name="P1"><text:span text:style-name="T1">Nahat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9" draw:id="id149" draw:layer="layout" svg:width="2.854cm" svg:height="1.588cm" svg:x="63.66cm" svg:y="71.388cm">
          <text:p text:style-name="P1"><text:span text:style-name="T1">Zer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1" draw:id="id161" draw:layer="layout" svg:width="2.854cm" svg:height="1.588cm" svg:x="67.149cm" svg:y="71.387cm">
          <text:p text:style-name="P1"><text:span text:style-name="T1">Shamm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2" draw:id="id162" draw:layer="layout" svg:width="2.854cm" svg:height="1.588cm" svg:x="70.55cm" svg:y="71.388cm">
          <text:p text:style-name="P1"><text:span text:style-name="T1">Mizz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56">
          <draw:connector draw:style-name="gr57" draw:text-style-name="P3" draw:layer="layout" draw:type="curve" svg:x1="7.491cm" svg:y1="53.041cm" svg:x2="11.313cm" svg:y2="54.955cm" draw:start-shape="id163" draw:start-glue-point="2" draw:end-shape="id164" draw:end-glue-point="0" svg:d="M7491 53041c0 479 956 958 1911 958 956 0 1911 478 1911 956" svg:viewBox="0 0 3823 1915">
            <text:p/>
          </draw:connector>
          <draw:connector draw:style-name="gr58" draw:text-style-name="P3" draw:layer="layout" draw:type="curve" svg:x1="7.491cm" svg:y1="50.401cm" svg:x2="11.312cm" svg:y2="51.454cm" draw:start-shape="id165" draw:start-glue-point="2" draw:end-shape="id166" draw:end-glue-point="0" svg:d="M7491 50401c0 790 3821 264 3821 1053" svg:viewBox="0 0 3822 1054">
            <text:p/>
          </draw:connector>
          <draw:custom-shape draw:style-name="gr18" draw:text-style-name="P2" xml:id="id166" draw:id="id166" draw:layer="layout" svg:width="2.854cm" svg:height="1.588cm" svg:x="9.885cm" svg:y="51.454cm">
            <text:p text:style-name="P1"><text:span text:style-name="T1">Bela</text:span></text:p>
            <text:p text:style-name="P1"><text:span text:style-name="T13">1Ch 1:4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12" xml:id="id165" draw:id="id165" draw:layer="layout" svg:width="2.854cm" svg:height="1.588cm" svg:x="6.064cm" svg:y="48.813cm">
            <text:p text:style-name="P11"><text:span text:style-name="T20">Beor</text:span></text:p>
            <text:p text:style-name="P11"><text:span text:style-name="T21">1Ch 1:4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64" draw:id="id164" draw:layer="layout" svg:width="2.854cm" svg:height="1.588cm" svg:x="9.886cm" svg:y="54.955cm">
            <text:p text:style-name="P1"><text:span text:style-name="T1">Jobab</text:span></text:p>
            <text:p text:style-name="P1"><text:span text:style-name="T13">1Ch 1:4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0" draw:text-style-name="P12" xml:id="id163" draw:id="id163" draw:layer="layout" svg:width="2.854cm" svg:height="1.588cm" svg:x="6.064cm" svg:y="51.453cm">
            <text:p text:style-name="P11"><text:span text:style-name="T20">Zerah</text:span></text:p>
            <text:p text:style-name="P11"><text:span text:style-name="T21">1Ch 1:4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2cm" svg:y1="53.042cm" svg:x2="11.313cm" svg:y2="54.955cm" draw:start-shape="id166" draw:start-glue-point="2" draw:end-shape="id164" draw:end-glue-point="0" svg:d="M11312 53042c0 1435 1 479 1 1913" svg:viewBox="0 0 2 1914">
            <text:p/>
          </draw:connector>
          <draw:custom-shape draw:style-name="gr18" draw:text-style-name="P2" xml:id="id167" draw:id="id167" draw:layer="layout" svg:width="2.854cm" svg:height="1.588cm" svg:x="9.887cm" svg:y="57.456cm">
            <text:p text:style-name="P1"><text:span text:style-name="T1">Husham</text:span></text:p>
            <text:p text:style-name="P1"><text:span text:style-name="T13">1Ch 1:4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3cm" svg:y1="56.543cm" svg:x2="11.314cm" svg:y2="57.456cm" draw:start-shape="id164" draw:start-glue-point="2" draw:end-shape="id167" draw:end-glue-point="0" svg:d="M11313 56543c0 685 1 229 1 913" svg:viewBox="0 0 2 914">
            <text:p/>
          </draw:connector>
          <draw:connector draw:style-name="gr57" draw:text-style-name="P3" draw:layer="layout" draw:type="curve" svg:x1="7.492cm" svg:y1="59.042cm" svg:x2="11.314cm" svg:y2="60.956cm" draw:start-shape="id168" draw:start-glue-point="2" draw:end-shape="id169" draw:end-glue-point="0" svg:d="M7492 59042c0 479 956 958 1911 958 956 0 1911 478 1911 956" svg:viewBox="0 0 3823 1915">
            <text:p/>
          </draw:connector>
          <draw:custom-shape draw:style-name="gr18" draw:text-style-name="P2" xml:id="id169" draw:id="id169" draw:layer="layout" svg:width="2.854cm" svg:height="1.588cm" svg:x="9.887cm" svg:y="60.956cm">
            <text:p text:style-name="P1"><text:span text:style-name="T1">Hadad</text:span></text:p>
            <text:p text:style-name="P1"><text:span text:style-name="T13">1Ch 1:4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2" draw:text-style-name="P12" xml:id="id168" draw:id="id168" draw:layer="layout" svg:width="2.854cm" svg:height="1.588cm" svg:x="6.065cm" svg:y="57.454cm">
            <text:p text:style-name="P11"><text:span text:style-name="T20">Bedad</text:span></text:p>
            <text:p text:style-name="P11"><text:span text:style-name="T21">1Ch 1:4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4cm" svg:y1="59.044cm" svg:x2="11.314cm" svg:y2="60.956cm" draw:start-shape="id167" draw:start-glue-point="2" draw:end-shape="id169" draw:end-glue-point="0" svg:d="M11314 59044v1912" svg:viewBox="0 0 1 1913">
            <text:p/>
          </draw:connector>
          <draw:custom-shape draw:style-name="gr18" draw:text-style-name="P2" xml:id="id170" draw:id="id170" draw:layer="layout" svg:width="2.854cm" svg:height="1.588cm" svg:x="9.888cm" svg:y="63.457cm">
            <text:p text:style-name="P1"><text:span text:style-name="T1">Samlah</text:span></text:p>
            <text:p text:style-name="P1"><text:span text:style-name="T13">1Ch 1:4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4cm" svg:y1="62.544cm" svg:x2="11.315cm" svg:y2="63.457cm" draw:start-shape="id169" draw:start-glue-point="2" draw:end-shape="id170" draw:end-glue-point="0" svg:d="M11314 62544c0 685 1 229 1 913" svg:viewBox="0 0 2 914">
            <text:p/>
          </draw:connector>
          <draw:custom-shape draw:style-name="gr18" draw:text-style-name="P2" xml:id="id171" draw:id="id171" draw:layer="layout" svg:width="2.854cm" svg:height="1.588cm" svg:x="9.889cm" svg:y="65.858cm">
            <text:p text:style-name="P1"><text:span text:style-name="T1">Shaul</text:span></text:p>
            <text:p text:style-name="P1"><text:span text:style-name="T13">1Ch 1:4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5cm" svg:y1="65.045cm" svg:x2="11.316cm" svg:y2="65.858cm" draw:start-shape="id170" draw:start-glue-point="2" draw:end-shape="id171" draw:end-glue-point="0" svg:d="M11315 65045c0 610 1 204 1 813" svg:viewBox="0 0 2 814">
            <text:p/>
          </draw:connector>
          <draw:connector draw:style-name="gr57" draw:text-style-name="P3" draw:layer="layout" draw:type="curve" svg:x1="7.493cm" svg:y1="67.443cm" svg:x2="11.328cm" svg:y2="69.357cm" draw:start-shape="id172" draw:start-glue-point="2" draw:end-shape="id173" draw:end-glue-point="0" svg:d="M7493 67443c0 479 959 958 1918 958 958 0 1917 478 1917 956" svg:viewBox="0 0 3836 1915">
            <text:p/>
          </draw:connector>
          <draw:custom-shape draw:style-name="gr63" draw:text-style-name="P2" xml:id="id173" draw:id="id173" draw:layer="layout" svg:width="3.048cm" svg:height="1.588cm" svg:x="9.804cm" svg:y="69.357cm">
            <text:p text:style-name="P1"><text:span text:style-name="T1">Baal-hanan</text:span></text:p>
            <text:p text:style-name="P1"><text:span text:style-name="T13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4" draw:text-style-name="P12" xml:id="id172" draw:id="id172" draw:layer="layout" svg:width="2.854cm" svg:height="1.588cm" svg:x="6.066cm" svg:y="65.855cm">
            <text:p text:style-name="P11"><text:span text:style-name="T20">Achbor</text:span></text:p>
            <text:p text:style-name="P11"><text:span text:style-name="T21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6cm" svg:y1="67.446cm" svg:x2="11.328cm" svg:y2="69.357cm" draw:start-shape="id171" draw:start-glue-point="2" draw:end-shape="id173" draw:end-glue-point="0" svg:d="M11316 67446c0 1434 12 479 12 1911" svg:viewBox="0 0 13 1912">
            <text:p/>
          </draw:connector>
          <draw:custom-shape draw:style-name="gr18" draw:text-style-name="P2" xml:id="id174" draw:id="id174" draw:layer="layout" svg:width="2.854cm" svg:height="1.588cm" svg:x="9.907cm" svg:y="71.558cm">
            <text:p text:style-name="P1"><text:span text:style-name="T1">Hadad</text:span></text:p>
            <text:p text:style-name="P1"><text:span text:style-name="T13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5" draw:text-style-name="P10" xml:id="id175" draw:id="id175" draw:layer="layout" svg:width="2.857cm" svg:height="1.588cm" svg:x="13.681cm" svg:y="71.558cm">
            <text:p text:style-name="P1"><text:span text:style-name="T1">Mehetabel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7" draw:text-style-name="P3" draw:layer="layout" draw:type="curve" svg:x1="12.761cm" svg:y1="72.352cm" svg:x2="13.681cm" svg:y2="72.352cm" draw:start-shape="id174" draw:start-glue-point="1" draw:end-shape="id175" draw:end-glue-point="3" svg:d="M12761 72352h920" svg:viewBox="0 0 921 1">
            <text:p/>
          </draw:connector>
          <draw:custom-shape draw:style-name="gr65" draw:text-style-name="P10" xml:id="id176" draw:id="id176" draw:layer="layout" svg:width="2.857cm" svg:height="1.588cm" svg:x="13.679cm" svg:y="69.315cm">
            <text:p text:style-name="P1"><text:span text:style-name="T1">Matred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6" draw:text-style-name="P13" xml:id="id177" draw:id="id177" draw:layer="layout" svg:width="2.854cm" svg:height="1.588cm" svg:x="13.677cm" svg:y="66.975cm">
            <text:p text:style-name="P1"><text:span text:style-name="T1">Mezahab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15.107cm" svg:y1="70.903cm" svg:x2="15.109cm" svg:y2="71.558cm" draw:start-shape="id176" draw:start-glue-point="2" draw:end-shape="id175" draw:end-glue-point="0" svg:d="M15107 70903c0 492 2 165 2 655" svg:viewBox="0 0 3 656">
            <text:p/>
          </draw:connector>
          <draw:connector draw:style-name="gr58" draw:text-style-name="P3" draw:layer="layout" draw:type="curve" svg:x1="15.104cm" svg:y1="68.563cm" svg:x2="15.107cm" svg:y2="69.315cm" draw:start-shape="id177" draw:start-glue-point="2" draw:end-shape="id176" draw:end-glue-point="0" svg:d="M15104 68563c0 565 3 190 3 752" svg:viewBox="0 0 4 753">
            <text:p/>
          </draw:connector>
          <draw:connector draw:style-name="gr61" draw:text-style-name="P3" draw:layer="layout" draw:type="curve" svg:x1="11.328cm" svg:y1="70.945cm" svg:x2="11.334cm" svg:y2="71.558cm" draw:start-shape="id173" draw:start-glue-point="2" draw:end-shape="id174" draw:end-glue-point="0" svg:d="M11328 70945c0 460 6 154 6 613" svg:viewBox="0 0 7 614">
            <text:p/>
          </draw:connector>
          <draw:custom-shape draw:style-name="gr67" draw:text-style-name="P15" draw:layer="layout" svg:width="12.383cm" svg:height="27.622cm" svg:x="5.108cm" svg:y="46.373cm">
            <text:p text:style-name="P14"><text:span text:style-name="T22">1Ch 1:43-50</text:span></text:p>
            <text:p text:style-name="P14"><text:span text:style-name="T22">Kings that reigned in the land of Edom before any king reigned over the children of Israel</text:span></text:p>
            <draw:enhanced-geometry svg:viewBox="0 0 21600 21600" draw:type="rectangle" draw:enhanced-path="M 0 0 L 21600 0 21600 21600 0 21600 0 0 Z N"/>
          </draw:custom-shape>
        </draw:g>
        <draw:custom-shape draw:style-name="gr68" draw:text-style-name="P12" xml:id="id211" draw:id="id211" draw:layer="layout" svg:width="2.854cm" svg:height="1.588cm" svg:x="104.844cm" svg:y="62.285cm">
          <text:p text:style-name="P11"><text:span text:style-name="T20">Nodab</text:span></text:p>
          <text:p text:style-name="P11"><text:span text:style-name="T21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56">
          <draw:custom-shape draw:style-name="gr69" draw:text-style-name="P10" xml:id="id202" draw:id="id202" draw:layer="layout" svg:width="2.54cm" svg:height="1.588cm" svg:x="71.838cm" svg:y="8.338cm">
            <text:p text:style-name="P1"><text:span text:style-name="T1">Timna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85.85cm" svg:y1="13.635cm" svg:x2="90.357cm" svg:y2="16.148cm" draw:start-shape="id178" draw:start-glue-point="2" draw:end-shape="id179" draw:end-glue-point="0" svg:d="M85850 13635c0 1885 4507 629 4507 2513" svg:viewBox="0 0 4508 2514">
            <text:p/>
          </draw:connector>
          <draw:connector draw:style-name="gr58" draw:text-style-name="P3" draw:layer="layout" draw:type="curve" svg:x1="90.357cm" svg:y1="17.736cm" svg:x2="90.366cm" svg:y2="18.849cm" draw:start-shape="id179" draw:start-glue-point="2" draw:end-shape="id180" draw:end-glue-point="0" svg:d="M90357 17736c0 835 9 279 9 1113" svg:viewBox="0 0 10 1114">
            <text:p/>
          </draw:connector>
          <draw:connector draw:style-name="gr58" draw:text-style-name="P3" draw:layer="layout" draw:type="curve" svg:x1="90.357cm" svg:y1="17.736cm" svg:x2="93.693cm" svg:y2="18.825cm" draw:start-shape="id179" draw:start-glue-point="2" draw:end-shape="id181" draw:end-glue-point="0" svg:d="M90357 17736c0 817 3336 273 3336 1089" svg:viewBox="0 0 3337 1090">
            <text:p/>
          </draw:connector>
          <draw:connector draw:style-name="gr58" draw:text-style-name="P3" draw:layer="layout" draw:type="curve" svg:x1="82.675cm" svg:y1="9.921cm" svg:x2="85.85cm" svg:y2="12.047cm" draw:start-shape="id182" draw:start-glue-point="2" draw:end-shape="id178" svg:d="M82675 9921c0 1596 3175 533 3175 2126" svg:viewBox="0 0 3176 2127">
            <text:p/>
          </draw:connector>
          <draw:custom-shape draw:style-name="gr18" draw:text-style-name="P2" xml:id="id199" draw:id="id199" draw:layer="layout" svg:width="2.854cm" svg:height="1.588cm" svg:x="74.699cm" svg:y="5.128cm">
            <text:p text:style-name="P1"><text:span text:style-name="T1">Seir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3" draw:id="id183" draw:layer="layout" svg:width="2.854cm" svg:height="1.588cm" svg:x="77.909cm" svg:y="8.333cm">
            <text:p text:style-name="P1"><text:span text:style-name="T1">Shobal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4" draw:id="id194" draw:layer="layout" svg:width="2.854cm" svg:height="1.588cm" svg:x="74.708cm" svg:y="8.333cm">
            <text:p text:style-name="P1"><text:span text:style-name="T1">Lota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8" draw:text-style-name="P2" xml:id="id182" draw:id="id182" draw:layer="layout" svg:width="3.174cm" svg:height="1.588cm" svg:x="81.088cm" svg:y="8.333cm">
            <text:p text:style-name="P1"><text:span text:style-name="T1">Zibeo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0" draw:id="id200" draw:layer="layout" svg:width="2.854cm" svg:height="1.588cm" svg:x="84.589cm" svg:y="8.334cm">
            <text:p text:style-name="P1"><text:span text:style-name="T1">Anah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1" draw:id="id201" draw:layer="layout" svg:width="2.854cm" svg:height="1.588cm" svg:x="87.99cm" svg:y="8.335cm">
            <text:p text:style-name="P1"><text:span text:style-name="T1">Disho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8" draw:id="id188" draw:layer="layout" svg:width="2.854cm" svg:height="1.588cm" svg:x="91.291cm" svg:y="8.336cm">
            <text:p text:style-name="P1"><text:span text:style-name="T1">Ezer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1" draw:id="id191" draw:layer="layout" svg:width="2.854cm" svg:height="1.588cm" svg:x="94.692cm" svg:y="8.337cm">
            <text:p text:style-name="P1"><text:span text:style-name="T1">Disha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draw:line-skew="1.868cm" svg:x1="79.336cm" svg:y1="9.921cm" svg:x2="82.652cm" svg:y2="16.156cm" draw:start-shape="id183" draw:start-glue-point="2" draw:end-shape="id184" draw:end-glue-point="0" svg:d="M79336 9921c0 7479 3316 4362 3316 6235" svg:viewBox="0 0 3317 6236">
            <text:p/>
          </draw:connector>
          <draw:connector draw:style-name="gr58" draw:text-style-name="P3" draw:layer="layout" draw:type="curve" draw:line-skew="1.55cm" svg:x1="79.336cm" svg:y1="9.921cm" svg:x2="85.923cm" svg:y2="16.157cm" draw:start-shape="id183" draw:start-glue-point="2" draw:end-shape="id185" draw:end-glue-point="0" svg:d="M79336 9921c0 7003 6587 3886 6587 6236" svg:viewBox="0 0 6588 6237">
            <text:p/>
          </draw:connector>
          <draw:connector draw:style-name="gr58" draw:text-style-name="P3" draw:layer="layout" draw:type="curve" svg:x1="82.675cm" svg:y1="9.921cm" svg:x2="82.681cm" svg:y2="12.046cm" draw:start-shape="id182" draw:start-glue-point="2" draw:end-shape="id186" draw:end-glue-point="0" svg:d="M82675 9921c0 1594 6 532 6 2125" svg:viewBox="0 0 7 2126">
            <text:p/>
          </draw:connector>
          <draw:connector draw:style-name="gr58" draw:text-style-name="P3" draw:layer="layout" draw:type="curve" svg:x1="79.336cm" svg:y1="9.921cm" svg:x2="79.351cm" svg:y2="16.155cm" draw:start-shape="id183" draw:start-glue-point="2" draw:end-shape="id187" draw:end-glue-point="0" svg:d="M79336 9921c0 4677 15 1560 15 6234" svg:viewBox="0 0 16 6235">
            <text:p/>
          </draw:connector>
          <draw:connector draw:style-name="gr58" draw:text-style-name="P3" draw:layer="layout" draw:type="curve" svg:x1="92.718cm" svg:y1="9.924cm" svg:x2="93.947cm" svg:y2="12.031cm" draw:start-shape="id188" draw:start-glue-point="2" draw:end-shape="id189" draw:end-glue-point="0" svg:d="M92718 9924c0 1581 1229 528 1229 2107" svg:viewBox="0 0 1230 2108">
            <text:p/>
          </draw:connector>
          <draw:connector draw:style-name="gr58" draw:text-style-name="P3" draw:layer="layout" draw:type="curve" svg:x1="92.718cm" svg:y1="9.924cm" svg:x2="90.75cm" svg:y2="12.03cm" draw:start-shape="id188" draw:start-glue-point="2" draw:end-shape="id190" draw:end-glue-point="0" svg:d="M92718 9924c0 1581-1968 528-1968 2106" svg:viewBox="0 0 1969 2107">
            <text:p/>
          </draw:connector>
          <draw:connector draw:style-name="gr58" draw:text-style-name="P3" draw:layer="layout" draw:type="curve" svg:x1="96.119cm" svg:y1="9.925cm" svg:x2="101.105cm" svg:y2="12.03cm" draw:start-shape="id191" draw:start-glue-point="2" draw:end-shape="id192" draw:end-glue-point="0" svg:d="M96119 9925c0 1579 4986 527 4986 2105" svg:viewBox="0 0 4987 2106">
            <text:p/>
          </draw:connector>
          <draw:connector draw:style-name="gr58" draw:text-style-name="P3" draw:layer="layout" draw:type="curve" svg:x1="92.718cm" svg:y1="9.924cm" svg:x2="97.192cm" svg:y2="12.032cm" draw:start-shape="id188" draw:start-glue-point="2" draw:end-shape="id193" draw:end-glue-point="0" svg:d="M92718 9924c0 1582 4474 529 4474 2108" svg:viewBox="0 0 4475 2109">
            <text:p/>
          </draw:connector>
          <draw:connector draw:style-name="gr58" draw:text-style-name="P3" draw:layer="layout" draw:type="curve" svg:x1="76.135cm" svg:y1="9.921cm" svg:x2="72.976cm" svg:y2="12.034cm" draw:start-shape="id194" draw:start-glue-point="2" draw:end-shape="id195" draw:end-glue-point="0" svg:d="M76135 9921c0 1585-3159 529-3159 2113" svg:viewBox="0 0 3160 2114">
            <text:p/>
          </draw:connector>
          <draw:connector draw:style-name="gr58" draw:text-style-name="P3" draw:layer="layout" draw:type="curve" draw:line-skew="1.514cm" svg:x1="79.336cm" svg:y1="9.921cm" svg:x2="72.843cm" svg:y2="16.153cm" draw:start-shape="id183" draw:start-glue-point="2" draw:end-shape="id196" draw:end-glue-point="0" svg:d="M79336 9921c0 6946-6493 3831-6493 6232" svg:viewBox="0 0 6494 6233">
            <text:p/>
          </draw:connector>
          <draw:connector draw:style-name="gr58" draw:text-style-name="P3" draw:layer="layout" draw:type="curve" draw:line-skew="1.868cm" svg:x1="79.336cm" svg:y1="9.921cm" svg:x2="76.106cm" svg:y2="16.154cm" draw:start-shape="id183" draw:start-glue-point="2" draw:end-shape="id197" draw:end-glue-point="0" svg:d="M79336 9921c0 7477-3230 4361-3230 6233" svg:viewBox="0 0 3231 6234">
            <text:p/>
          </draw:connector>
          <draw:connector draw:style-name="gr58" draw:text-style-name="P3" draw:layer="layout" draw:type="curve" svg:x1="76.135cm" svg:y1="9.921cm" svg:x2="76.137cm" svg:y2="12.034cm" draw:start-shape="id194" draw:start-glue-point="2" draw:end-shape="id198" draw:end-glue-point="0" svg:d="M76135 9921c0 1585 2 529 2 2113" svg:viewBox="0 0 3 2114">
            <text:p/>
          </draw:connector>
          <draw:connector draw:style-name="gr58" draw:text-style-name="P3" draw:layer="layout" draw:type="curve" svg:x1="76.126cm" svg:y1="6.716cm" svg:x2="82.675cm" svg:y2="8.333cm" draw:start-shape="id199" draw:start-glue-point="2" draw:end-shape="id182" draw:end-glue-point="0" svg:d="M76126 6716c0 1213 6549 405 6549 1617" svg:viewBox="0 0 6550 1618">
            <text:p/>
          </draw:connector>
          <draw:connector draw:style-name="gr58" draw:text-style-name="P3" draw:layer="layout" draw:type="curve" svg:x1="76.126cm" svg:y1="6.716cm" svg:x2="79.336cm" svg:y2="8.333cm" draw:start-shape="id199" draw:start-glue-point="2" draw:end-shape="id183" draw:end-glue-point="0" svg:d="M76126 6716c0 1213 3210 405 3210 1617" svg:viewBox="0 0 3211 1618">
            <text:p/>
          </draw:connector>
          <draw:connector draw:style-name="gr58" draw:text-style-name="P3" draw:layer="layout" draw:type="curve" svg:x1="76.126cm" svg:y1="6.716cm" svg:x2="76.135cm" svg:y2="8.333cm" draw:start-shape="id199" draw:start-glue-point="2" draw:end-shape="id194" draw:end-glue-point="0" svg:d="M76126 6716c0 1213 9 405 9 1617" svg:viewBox="0 0 10 1618">
            <text:p/>
          </draw:connector>
          <draw:connector draw:style-name="gr58" draw:text-style-name="P3" draw:layer="layout" draw:type="curve" svg:x1="76.126cm" svg:y1="6.716cm" svg:x2="86.016cm" svg:y2="8.334cm" draw:start-shape="id199" draw:start-glue-point="2" draw:end-shape="id200" draw:end-glue-point="0" svg:d="M76126 6716c0 1215 9890 406 9890 1618" svg:viewBox="0 0 9891 1619">
            <text:p/>
          </draw:connector>
          <draw:connector draw:style-name="gr58" draw:text-style-name="P3" draw:layer="layout" draw:type="curve" svg:x1="76.126cm" svg:y1="6.716cm" svg:x2="96.119cm" svg:y2="8.337cm" draw:start-shape="id199" draw:start-glue-point="2" draw:end-shape="id191" draw:end-glue-point="0" svg:d="M76126 6716c0 1216 19993 406 19993 1621" svg:viewBox="0 0 19994 1622">
            <text:p/>
          </draw:connector>
          <draw:connector draw:style-name="gr58" draw:text-style-name="P3" draw:layer="layout" draw:type="curve" svg:x1="76.126cm" svg:y1="6.716cm" svg:x2="92.718cm" svg:y2="8.336cm" draw:start-shape="id199" draw:start-glue-point="2" draw:end-shape="id188" draw:end-glue-point="0" svg:d="M76126 6716c0 1216 16592 407 16592 1620" svg:viewBox="0 0 16593 1621">
            <text:p/>
          </draw:connector>
          <draw:connector draw:style-name="gr58" draw:text-style-name="P3" draw:layer="layout" draw:type="curve" svg:x1="76.126cm" svg:y1="6.716cm" svg:x2="89.417cm" svg:y2="8.335cm" draw:start-shape="id199" draw:start-glue-point="2" draw:end-shape="id201" draw:end-glue-point="0" svg:d="M76126 6716c0 1215 13291 406 13291 1619" svg:viewBox="0 0 13292 1620">
            <text:p/>
          </draw:connector>
          <draw:connector draw:style-name="gr58" draw:text-style-name="P3" draw:layer="layout" draw:type="curve" svg:x1="76.126cm" svg:y1="6.716cm" svg:x2="73.108cm" svg:y2="8.338cm" draw:start-shape="id199" draw:start-glue-point="2" draw:end-shape="id202" draw:end-glue-point="0" svg:d="M76126 6716c0 1218-3018 407-3018 1622" svg:viewBox="0 0 3019 1623">
            <text:p/>
          </draw:connector>
          <draw:custom-shape draw:style-name="gr18" draw:text-style-name="P2" xml:id="id198" draw:id="id198" draw:layer="layout" svg:width="2.854cm" svg:height="1.588cm" svg:x="74.71cm" svg:y="12.034cm">
            <text:p text:style-name="P1"><text:span text:style-name="T1">Homam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5" draw:id="id195" draw:layer="layout" svg:width="2.854cm" svg:height="1.588cm" svg:x="71.549cm" svg:y="12.034cm">
            <text:p text:style-name="P1"><text:span text:style-name="T1">Hori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0" draw:text-style-name="P2" xml:id="id196" draw:id="id196" draw:layer="layout" svg:width="2.87cm" svg:height="1.588cm" svg:x="71.408cm" svg:y="16.153cm">
            <text:p text:style-name="P1"><text:span text:style-name="T1">Alian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7" draw:id="id197" draw:layer="layout" svg:width="2.854cm" svg:height="1.588cm" svg:x="74.679cm" svg:y="16.154cm">
            <text:p text:style-name="P1"><text:span text:style-name="T1">Manahat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7" draw:id="id187" draw:layer="layout" svg:width="2.854cm" svg:height="1.588cm" svg:x="77.924cm" svg:y="16.155cm">
            <text:p text:style-name="P1"><text:span text:style-name="T1">Ebal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4" draw:id="id184" draw:layer="layout" svg:width="2.854cm" svg:height="1.588cm" svg:x="81.225cm" svg:y="16.156cm">
            <text:p text:style-name="P1"><text:span text:style-name="T1">Shephi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5" draw:id="id185" draw:layer="layout" svg:width="2.854cm" svg:height="1.588cm" svg:x="84.496cm" svg:y="16.157cm">
            <text:p text:style-name="P1"><text:span text:style-name="T1">Onam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6" draw:id="id186" draw:layer="layout" svg:width="2.854cm" svg:height="1.588cm" svg:x="81.254cm" svg:y="12.046cm">
            <text:p text:style-name="P1"><text:span text:style-name="T1">Aia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78" draw:id="id178" draw:layer="layout" svg:width="2.854cm" svg:height="1.588cm" svg:x="84.423cm" svg:y="12.047cm">
            <text:p text:style-name="P1"><text:span text:style-name="T1">Ana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79" draw:id="id179" draw:layer="layout" svg:width="2.854cm" svg:height="1.588cm" svg:x="88.93cm" svg:y="16.148cm">
            <text:p text:style-name="P1"><text:span text:style-name="T1">Disho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0" draw:id="id180" draw:layer="layout" svg:width="2.854cm" svg:height="1.588cm" svg:x="88.939cm" svg:y="18.849cm">
            <text:p text:style-name="P1"><text:span text:style-name="T1">Amram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1" draw:id="id181" draw:layer="layout" svg:width="2.854cm" svg:height="1.588cm" svg:x="92.266cm" svg:y="18.825cm">
            <text:p text:style-name="P1"><text:span text:style-name="T1">Eshb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3" draw:id="id203" draw:layer="layout" svg:width="2.854cm" svg:height="1.588cm" svg:x="95.567cm" svg:y="18.826cm">
            <text:p text:style-name="P1"><text:span text:style-name="T1">Ithr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4" draw:id="id204" draw:layer="layout" svg:width="2.854cm" svg:height="1.588cm" svg:x="98.968cm" svg:y="18.827cm">
            <text:p text:style-name="P1"><text:span text:style-name="T1">Cher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90.357cm" svg:y1="17.736cm" svg:x2="96.994cm" svg:y2="18.826cm" draw:start-shape="id179" draw:start-glue-point="2" draw:end-shape="id203" draw:end-glue-point="0" svg:d="M90357 17736c0 819 6637 274 6637 1090" svg:viewBox="0 0 6638 1091">
            <text:p/>
          </draw:connector>
          <draw:connector draw:style-name="gr58" draw:text-style-name="P3" draw:layer="layout" draw:type="curve" svg:x1="90.357cm" svg:y1="17.736cm" svg:x2="100.395cm" svg:y2="18.827cm" draw:start-shape="id179" draw:start-glue-point="2" draw:end-shape="id204" draw:end-glue-point="0" svg:d="M90357 17736c0 819 10038 274 10038 1091" svg:viewBox="0 0 10039 1092">
            <text:p/>
          </draw:connector>
          <draw:custom-shape draw:style-name="gr18" draw:text-style-name="P2" xml:id="id190" draw:id="id190" draw:layer="layout" svg:width="2.854cm" svg:height="1.588cm" svg:x="89.323cm" svg:y="12.03cm">
            <text:p text:style-name="P1"><text:span text:style-name="T1">Bilh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9" draw:id="id189" draw:layer="layout" svg:width="2.854cm" svg:height="1.588cm" svg:x="92.52cm" svg:y="12.031cm">
            <text:p text:style-name="P1"><text:span text:style-name="T1">Zav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3" draw:id="id193" draw:layer="layout" svg:width="2.854cm" svg:height="1.588cm" svg:x="95.765cm" svg:y="12.032cm">
            <text:p text:style-name="P1"><text:span text:style-name="T1">Jak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2" draw:id="id192" draw:layer="layout" svg:width="2.854cm" svg:height="1.588cm" svg:x="99.678cm" svg:y="12.03cm">
            <text:p text:style-name="P1"><text:span text:style-name="T1">Uz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5" draw:id="id205" draw:layer="layout" svg:width="2.854cm" svg:height="1.588cm" svg:x="102.845cm" svg:y="12.031cm">
            <text:p text:style-name="P1"><text:span text:style-name="T1">Ar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96.119cm" svg:y1="9.925cm" svg:x2="104.272cm" svg:y2="12.031cm" draw:start-shape="id191" draw:start-glue-point="2" draw:end-shape="id205" draw:end-glue-point="0" svg:d="M96119 9925c0 1581 8153 528 8153 2106" svg:viewBox="0 0 8154 2107">
            <text:p/>
          </draw:connector>
          <draw:custom-shape draw:style-name="gr71" draw:text-style-name="P15" draw:layer="layout" svg:width="36.513cm" svg:height="16.828cm" svg:x="70.373cm" svg:y="4.21cm">
            <text:p text:style-name="P14"><text:span text:style-name="T22">1Ch 1:38-42</text:span></text:p>
            <text:p text:style-name="P14"><text:span text:style-name="T22">Sons of Seir (the Horite Gen 36:20)</text:span></text:p>
            <draw:enhanced-geometry svg:viewBox="0 0 21600 21600" draw:type="rectangle" draw:enhanced-path="M 0 0 L 21600 0 21600 21600 0 21600 0 0 Z N"/>
          </draw:custom-shape>
        </draw:g>
        <draw:g draw:style-name="gr56">
          <draw:custom-shape draw:style-name="gr18" draw:text-style-name="P2" draw:layer="layout" svg:width="2.854cm" svg:height="1.588cm" svg:x="22.667cm" svg:y="59.485cm">
            <text:p text:style-name="P1"><text:span text:style-name="T1">Alia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266cm" svg:y="59.485cm">
            <text:p text:style-name="P1"><text:span text:style-name="T1">Timna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8" draw:text-style-name="P2" draw:layer="layout" svg:width="3.174cm" svg:height="1.588cm" svg:x="25.846cm" svg:y="59.485cm">
            <text:p text:style-name="P1"><text:span text:style-name="T1">Jethet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2" draw:text-style-name="P2" draw:layer="layout" svg:width="3.175cm" svg:height="1.588cm" svg:x="19.271cm" svg:y="61.586cm">
            <text:p text:style-name="P1"><text:span text:style-name="T1">Aholibamah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748cm" svg:y="61.587cm">
            <text:p text:style-name="P1"><text:span text:style-name="T1">Elah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6.011cm" svg:y="61.588cm">
            <text:p text:style-name="P1"><text:span text:style-name="T1">Pinon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317cm" svg:y="63.889cm">
            <text:p text:style-name="P1"><text:span text:style-name="T1">Kenaz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685cm" svg:y="63.887cm">
            <text:p text:style-name="P1"><text:span text:style-name="T1">Teman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6.049cm" svg:y="63.888cm">
            <text:p text:style-name="P1"><text:span text:style-name="T1">Mibzar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25cm" svg:y="66.189cm">
            <text:p text:style-name="P1"><text:span text:style-name="T1">Magdiel</text:span></text:p>
            <text:p text:style-name="P1"><text:span text:style-name="T13">1Ch 1:5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651cm" svg:y="66.19cm">
            <text:p text:style-name="P1"><text:span text:style-name="T1">Iram</text:span></text:p>
            <text:p text:style-name="P1"><text:span text:style-name="T13">1Ch 1:5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3" draw:text-style-name="P15" draw:layer="layout" svg:width="11.112cm" svg:height="10.795cm" svg:x="18.631cm" svg:y="57.58cm">
            <text:p text:style-name="P14"><text:span text:style-name="T22">1Ch 1:51-54</text:span></text:p>
            <text:p text:style-name="P14"><text:span text:style-name="T22">The dukes of Edo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2" xml:id="id207" draw:id="id207" draw:layer="layout" svg:width="2.854cm" svg:height="1.588cm" svg:x="15.131cm" svg:y="35.415cm">
          <text:p text:style-name="P1"><text:span text:style-name="T1">Dedan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2" xml:id="id206" draw:id="id206" draw:layer="layout" svg:width="2.854cm" svg:height="2.223cm" svg:x="11.856cm" svg:y="35.415cm">
          <text:p text:style-name="P1"><text:span text:style-name="T1">Sheba</text:span></text:p>
          <text:p text:style-name="P4"><text:span text:style-name="T13">1Ch 1:9</text:span></text:p>
          <text:p text:style-name="P1"><text:span text:style-name="T1">Sabeans</text:span><text:span text:style-name="T18"> </text:span><text:span text:style-name="T13">Isa 45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14.892cm" svg:y1="34.677cm" svg:x2="13.283cm" svg:y2="35.415cm" draw:start-shape="id68" draw:start-glue-point="2" draw:end-shape="id206" draw:end-glue-point="0" svg:d="M14892 34677c0 553-1609 185-1609 738" svg:viewBox="0 0 1610 739">
          <text:p/>
        </draw:connector>
        <draw:connector draw:style-name="gr3" draw:text-style-name="P3" draw:layer="layout" draw:type="curve" svg:x1="14.892cm" svg:y1="34.677cm" svg:x2="16.558cm" svg:y2="35.415cm" draw:start-shape="id68" draw:start-glue-point="2" draw:end-shape="id207" draw:end-glue-point="0" svg:d="M14892 34677c0 555 1666 186 1666 738" svg:viewBox="0 0 1667 739">
          <text:p/>
        </draw:connector>
        <draw:custom-shape draw:style-name="gr75" draw:text-style-name="P2" xml:id="id208" draw:id="id208" draw:layer="layout" svg:width="4.267cm" svg:height="5.131cm" svg:x="24.568cm" svg:y="45.785cm">
          <text:p text:style-name="P1"><text:span text:style-name="T1">Philistines</text:span></text:p>
          <text:p text:style-name="P4"><text:span text:style-name="T2">1Ch 1:12</text:span></text:p>
          <text:p text:style-name="P1"><text:span text:style-name="T1">Philistim</text:span></text:p>
          <text:p text:style-name="P1"><text:span text:style-name="T2">Gen 10:14</text:span></text:p>
          <text:p text:style-name="P1"><text:span text:style-name="T1">Palestina </text:span></text:p>
          <text:p text:style-name="P1"><text:span text:style-name="T13">Exo 15:14</text:span></text:p>
          <text:p text:style-name="P1"><text:span text:style-name="T1">Palestine</text:span></text:p>
          <text:p text:style-name="P1"><text:span text:style-name="T13">Joe 3:4</text:span></text:p>
          <text:p text:style-name="P1"><text:span text:style-name="T1">Philistia</text:span></text:p>
          <text:p text:style-name="P1"><text:span text:style-name="T13">Psa 60:8, 87:4, 108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26.698cm" svg:y1="44.326cm" svg:x2="26.701cm" svg:y2="45.785cm" draw:start-shape="id101" draw:start-glue-point="2" draw:end-shape="id208" draw:end-glue-point="0" svg:d="M26698 44326c0 1095 3 366 3 1459" svg:viewBox="0 0 4 1460">
          <text:p/>
        </draw:connector>
        <draw:custom-shape draw:style-name="gr76" draw:text-style-name="P10" xml:id="id209" draw:id="id209" draw:layer="layout" svg:width="3.048cm" svg:height="2.032cm" svg:x="67.731cm" svg:y="62.263cm">
          <text:p text:style-name="P1"><text:span text:style-name="T1">Bashemath</text:span></text:p>
          <text:p text:style-name="P4"><text:span text:style-name="T13">Gen 36:3</text:span></text:p>
          <text:p text:style-name="P1"><text:span text:style-name="T1">Mahalath</text:span></text:p>
          <text:p text:style-name="P1"><text:span text:style-name="T13">Gen 28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26cm" svg:y1="60.709cm" svg:x2="69.255cm" svg:y2="62.263cm" draw:start-shape="id81" draw:start-glue-point="2" draw:end-shape="id209" draw:end-glue-point="0" svg:d="M61626 60709c0 1167 7629 390 7629 1554" svg:viewBox="0 0 7630 1555">
          <text:p/>
        </draw:connector>
        <draw:custom-shape draw:style-name="gr49" draw:text-style-name="P10" xml:id="id210" draw:id="id210" draw:layer="layout" svg:width="2.571cm" svg:height="1.588cm" svg:x="60.897cm" svg:y="55.05cm">
          <text:p text:style-name="P1"><text:span text:style-name="T1">Hagar</text:span></text:p>
          <text:p text:style-name="P1"><text:span text:style-name="T13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xml:id="id121" draw:id="id121" draw:layer="layout" draw:type="curve" svg:x1="60.897cm" svg:y1="55.844cm" svg:x2="59.707cm" svg:y2="55.847cm" draw:start-shape="id210" draw:start-glue-point="3" draw:end-shape="id120" draw:end-glue-point="1" svg:d="M60897 55844c-892 0-298 3-1190 3" svg:viewBox="0 0 1191 4">
          <text:p/>
        </draw:connector>
        <draw:connector draw:style-name="gr3" draw:text-style-name="P3" draw:layer="layout" draw:type="curve" svg:x1="61.626cm" svg:y1="60.709cm" svg:x2="106.271cm" svg:y2="62.285cm" draw:start-shape="id81" draw:start-glue-point="2" draw:end-shape="id211" draw:end-glue-point="0" svg:d="M61626 60709c0 1183 44645 396 44645 1576" svg:viewBox="0 0 44646 1577">
          <text:p/>
        </draw:connector>
        <draw:connector draw:style-name="gr3" draw:text-style-name="P3" draw:layer="layout" draw:type="curve" svg:x1="58.28cm" svg:y1="60.709cm" svg:x2="61.675cm" svg:y2="62.257cm" draw:start-shape="id124" draw:start-glue-point="2" draw:end-shape="id212" draw:end-glue-point="0" svg:d="M58280 60709c0 1162 3395 389 3395 1548" svg:viewBox="0 0 3396 1549">
          <text:p/>
        </draw:connector>
        <draw:custom-shape draw:style-name="gr77" draw:text-style-name="P17" draw:layer="layout" svg:width="18.732cm" svg:height="4.762cm" svg:x="18.733cm" svg:y="10.042cm">
          <text:p text:style-name="P16"><text:span text:style-name="T23">1 </text:span><text:span text:style-name="T24">Chronicles</text:span><text:span text:style-name="T23"> 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5.119cm" svg:y1="31.092cm" svg:x2="71.543cm" svg:y2="34.608cm" draw:start-shape="id78" draw:start-glue-point="2" draw:end-shape="id213" draw:end-glue-point="0" svg:d="M65119 31092c0 2637 6424 879 6424 3516" svg:viewBox="0 0 6425 351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9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1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1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1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14.3cm" fo:page-height="76.2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31:53.098917850</dc:date>
    <meta:editing-duration>P1DT12H51M45S</meta:editing-duration>
    <meta:editing-cycles>847</meta:editing-cycles>
    <meta:generator>LibreOffice/26.2.4.2$Linux_X86_64 LibreOffice_project/64a984c51f4702dbd3710b13428c673a2f1292e7</meta:generator>
    <meta:print-date>2025-06-13T22:00:40.382818700</meta:print-date>
    <meta:printed-by>PDF files</meta:printed-by>
    <meta:document-statistic meta:object-count="445"/>
  </office:meta>
</office:document-meta>
</file>