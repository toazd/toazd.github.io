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9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100"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100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2" table:default-cell-style-name="Default"/>
        <table:table-column table:style-name="co2" table:number-columns-repeated="16380"/>
        <table:table-row table:style-name="ro1">
          <table:table-cell office:value-type="string" calcext:value-type="string">
            <text:p>Gen 15:1 thy exceeding</text:p>
          </table:table-cell>
          <table:table-cell/>
          <table:table-cell office:value-type="string" calcext:value-type="string">
            <text:p>Gen 31:32 thine with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string" calcext:value-type="string">
            <text:p>Gen 16:11 thy affliction</text:p>
          </table:table-cell>
          <table:table-cell/>
          <table:table-cell office:value-type="string" calcext:value-type="string">
            <text:p>Deu 15:3 thine with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string" calcext:value-type="string">
            <text:p>Gen 31:38 thy ewes</text:p>
          </table:table-cell>
          <table:table-cell/>
          <table:table-cell office:value-type="string" calcext:value-type="string">
            <text:p>Deu 30:4 thine be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string" calcext:value-type="string">
            <text:p>Gen 48:6 thy issue</text:p>
          </table:table-cell>
          <table:table-cell/>
          <table:table-cell office:value-type="string" calcext:value-type="string">
            <text:p>1Ch 21:24 thine for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string" calcext:value-type="string">
            <text:p>Exo 23:11 thy oliveyard</text:p>
          </table:table-cell>
          <table:table-cell/>
          <table:table-cell office:value-type="string" calcext:value-type="string">
            <text:p>Psa 16:10 thine Holy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string" calcext:value-type="string">
            <text:p>Exo 33:5 thy ornaments</text:p>
          </table:table-cell>
          <table:table-cell/>
          <table:table-cell office:value-type="string" calcext:value-type="string">
            <text:p>Jer 32:7 thine to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string" calcext:value-type="string">
            <text:p>Lev 2:5 thy oblation</text:p>
          </table:table-cell>
          <table:table-cell/>
          <table:table-cell office:value-type="string" calcext:value-type="string">
            <text:p>Joh 17:6 thine they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string" calcext:value-type="string">
            <text:p>Lev 2:7 thy oblation</text:p>
          </table:table-cell>
          <table:table-cell/>
          <table:table-cell office:value-type="string" calcext:value-type="string">
            <text:p>Act 2:27 thine Holy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string" calcext:value-type="string">
            <text:p>Lev 5:15 thy estimation</text:p>
          </table:table-cell>
          <table:table-cell/>
          <table:table-cell office:value-type="string" calcext:value-type="string">
            <text:p>Act 13:35 thine Holy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string" calcext:value-type="string">
            <text:p>Lev 5:18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6:6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2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3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3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4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5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6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6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7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8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13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15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16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17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18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19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23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25 thy estimation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ev 27:27 thy estim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Deu 12:17 thy oi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Deu 21:2 thy elde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Deu 32:7 thy elde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Deu 33:29 thy excellenc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1Sa 25:33 thy advic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1Ki 10:6 thy act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2Ki 19:27 thy abod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Job 15:12 thy ey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Psa 20:3 thy offering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Pro 24:14 thy expect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Isa 37:28 thy abod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Isa 60:17 thy office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Eze 16:36 thy abomination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Eze 23:40 thy ey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Luk 2:35 thy ow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Phm 1:21 thy obedienc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2Jo 1:13 thy elect</text:p>
          </table:table-cell>
          <table:table-cell table:number-columns-repeated="3"/>
          <table:table-cell table:style-name="ce4" table:number-columns-repeated="16380"/>
        </table:table-row>
        <table:table-row table:style-name="ro1" table:number-rows-repeated="1048529">
          <table:table-cell table:number-columns-repeated="4"/>
          <table:table-cell table:style-name="ce4" table:number-columns-repeated="16380"/>
        </table:table-row>
        <table:table-row table:style-name="ro1">
          <table:table-cell table:number-columns-repeated="4"/>
          <table:table-cell table:style-name="ce4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20:21.2236389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illiam K. McDannell Jr.</meta:initial-creator>
    <meta:creation-date>2025-10-17T11:44:14.364883500</meta:creation-date>
    <dc:date>2026-07-11T12:20:21.251595103</dc:date>
    <meta:editing-duration>PT4H3M48S</meta:editing-duration>
    <meta:editing-cycles>10</meta:editing-cycles>
    <meta:generator>LibreOffice/26.2.4.2$Linux_X86_64 LibreOffice_project/64a984c51f4702dbd3710b13428c673a2f1292e7</meta:generator>
    <meta:document-statistic meta:table-count="1" meta:cell-count="55" meta:object-count="0"/>
  </office:meta>
</office:document-meta>
</file>