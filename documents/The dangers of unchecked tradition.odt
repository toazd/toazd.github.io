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900000348885310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875in" table:align="center"/>
    </style:style>
    <style:style style:name="Table1.A" style:family="table-column">
      <style:table-column-properties style:column-width="7.875in"/>
    </style:style>
    <style:style style:name="Table1.1" style:family="table-row">
      <style:table-row-properties style:min-row-height="4.436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d73c1" officeooo:paragraph-rsid="001d73c1" style:font-size-asian="14pt" style:font-name-complex="Liberation Sans" style:font-size-complex="14pt"/>
    </style:style>
    <style:style style:name="P2" style:family="paragraph" style:parent-style-name="Standard">
      <style:text-properties style:font-name="Liberation Sans" fo:font-size="12pt" style:font-size-asian="12pt" style:font-name-complex="Liberation Sans" style:font-size-complex="12pt"/>
    </style:style>
    <style:style style:name="P3" style:family="paragraph" style:parent-style-name="Standard">
      <style:text-properties style:font-name="Liberation Sans" fo:font-size="12pt" officeooo:paragraph-rsid="001deca1" style:font-size-asian="12pt" style:font-name-complex="Liberation Sans" style:font-size-complex="12pt"/>
    </style:style>
    <style:style style:name="P4" style:family="paragraph" style:parent-style-name="Standard">
      <style:text-properties officeooo:rsid="001deca1" officeooo:paragraph-rsid="001deca1"/>
    </style:style>
    <style:style style:name="P5" style:family="paragraph" style:parent-style-name="Standard">
      <style:text-properties style:font-name="Liberation Sans" fo:font-size="12pt" officeooo:rsid="001deca1" officeooo:paragraph-rsid="001deca1" style:font-size-asian="12pt" style:font-name-complex="Liberation Sans" style:font-size-complex="12pt"/>
    </style:style>
    <style:style style:name="P6" style:family="paragraph" style:parent-style-name="Standard">
      <style:text-properties style:font-name="Liberation Sans" fo:font-size="12pt" officeooo:rsid="001e7904" officeooo:paragraph-rsid="001e7904" style:font-size-asian="12pt" style:font-name-complex="Liberation Sans" style:font-size-complex="12pt"/>
    </style:style>
    <style:style style:name="P7" style:family="paragraph" style:parent-style-name="Standard">
      <style:text-properties style:font-name="Liberation Sans" fo:font-size="12pt" officeooo:rsid="001e7904" officeooo:paragraph-rsid="003eef76" style:font-size-asian="12pt" style:font-name-complex="Liberation Sans" style:font-size-complex="12pt"/>
    </style:style>
    <style:style style:name="P8" style:family="paragraph" style:parent-style-name="Standard">
      <style:text-properties style:font-name="Liberation Sans" fo:font-size="12pt" fo:font-style="normal" officeooo:rsid="00201b3b" officeooo:paragraph-rsid="00201b3b" style:font-size-asian="12pt" style:font-style-asian="normal" style:font-name-complex="Liberation Sans" style:font-size-complex="12pt" style:font-style-complex="normal"/>
    </style:style>
    <style:style style:name="P9" style:family="paragraph" style:parent-style-name="Standard">
      <style:paragraph-properties fo:text-align="left" style:justify-single-word="false"/>
      <style:text-properties style:font-name="Liberation Sans" fo:font-size="12pt" fo:font-style="normal" officeooo:rsid="0022ce6d" officeooo:paragraph-rsid="0022ce6d" style:font-size-asian="12pt" style:font-style-asian="normal" style:font-name-complex="Liberation Sans" style:font-size-complex="12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name-complex="Liberation Sans" style:font-size-complex="12pt"/>
    </style:style>
    <style:style style:name="P11" style:family="paragraph" style:parent-style-name="Standard">
      <style:text-properties style:font-name="Liberation Sans" fo:font-size="12pt" fo:font-style="normal" officeooo:rsid="0022ce6d" officeooo:paragraph-rsid="004b3787" style:font-size-asian="12pt" style:font-style-asian="normal" style:font-name-complex="Liberation Sans" style:font-size-complex="12pt" style:font-style-complex="normal"/>
    </style:style>
    <style:style style:name="T1" style:family="text">
      <style:text-properties officeooo:rsid="004d0b92"/>
    </style:style>
    <style:style style:name="T2" style:family="text">
      <style:text-properties officeooo:rsid="001deca1"/>
    </style:style>
    <style:style style:name="T3" style:family="text">
      <style:text-properties officeooo:rsid="00667a87"/>
    </style:style>
    <style:style style:name="T4" style:family="text">
      <style:text-properties style:font-name="Liberation Sans" fo:font-size="11pt" style:font-size-asian="11pt" style:font-name-complex="Liberation Sans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edd6"/>
    </style:style>
    <style:style style:name="T7" style:family="text">
      <style:text-properties fo:color="#127622" loext:opacity="100%" officeooo:rsid="0026edd6"/>
    </style:style>
    <style:style style:name="T8" style:family="text">
      <style:text-properties officeooo:rsid="00201b3b"/>
    </style:style>
    <style:style style:name="T9" style:family="text">
      <style:text-properties fo:font-style="italic" officeooo:rsid="00201b3b" style:font-style-asian="italic" style:font-style-complex="italic"/>
    </style:style>
    <style:style style:name="T10" style:family="text">
      <style:text-properties fo:font-style="normal" officeooo:rsid="00201b3b" style:font-style-asian="normal" style:font-style-complex="normal"/>
    </style:style>
    <style:style style:name="T11" style:family="text">
      <style:text-properties fo:font-style="normal" officeooo:rsid="00263d5e" style:font-style-asian="normal" style:font-style-complex="normal"/>
    </style:style>
    <style:style style:name="T12" style:family="text">
      <style:text-properties fo:font-style="normal" officeooo:rsid="004dc6fb" style:font-style-asian="normal" style:font-style-complex="normal"/>
    </style:style>
    <style:style style:name="T13" style:family="text">
      <style:text-properties fo:font-style="normal" officeooo:rsid="004f666b" style:font-style-asian="normal" style:font-style-complex="normal"/>
    </style:style>
    <style:style style:name="T14" style:family="text">
      <style:text-properties fo:font-style="normal" officeooo:rsid="0067cdf3" style:font-style-asian="normal" style:font-style-complex="normal"/>
    </style:style>
    <style:style style:name="T15" style:family="text">
      <style:text-properties fo:color="#127622" loext:opacity="100%" fo:font-style="normal" officeooo:rsid="0067cdf3" style:font-style-asian="normal" style:font-style-complex="normal"/>
    </style:style>
    <style:style style:name="T16" style:family="text">
      <style:text-properties style:text-position="super 58%"/>
    </style:style>
    <style:style style:name="T17" style:family="text">
      <style:text-properties officeooo:rsid="0024b8e6"/>
    </style:style>
    <style:style style:name="T18" style:family="text">
      <style:text-properties officeooo:rsid="00289a53"/>
    </style:style>
    <style:style style:name="T19" style:family="text">
      <style:text-properties fo:color="#127622" loext:opacity="100%" officeooo:rsid="00289a53"/>
    </style:style>
    <style:style style:name="T20" style:family="text">
      <style:text-properties officeooo:rsid="004bd91f"/>
    </style:style>
    <style:style style:name="T21" style:family="text">
      <style:text-properties officeooo:rsid="00604846"/>
    </style:style>
    <style:style style:name="T22" style:family="text">
      <style:text-properties fo:color="#127622" loext:opacity="100%"/>
    </style:style>
    <style:style style:name="T23" style:family="text">
      <style:text-properties officeooo:rsid="00492b7c"/>
    </style:style>
    <style:style style:name="T24" style:family="text">
      <style:text-properties officeooo:rsid="0049d25a"/>
    </style:style>
    <style:style style:name="T25" style:family="text">
      <style:text-properties officeooo:rsid="00263d5e"/>
    </style:style>
    <style:style style:name="T26" style:family="text">
      <style:text-properties officeooo:rsid="005389e3"/>
    </style:style>
    <style:style style:name="T27" style:family="text">
      <style:text-properties fo:color="#127622" loext:opacity="100%" officeooo:rsid="00263d5e"/>
    </style:style>
    <style:style style:name="T28" style:family="text">
      <style:text-properties style:text-position="super 58%" officeooo:rsid="00263d5e"/>
    </style:style>
    <style:style style:name="T29" style:family="text">
      <style:text-properties officeooo:rsid="002b5569"/>
    </style:style>
    <style:style style:name="T30" style:family="text">
      <style:text-properties officeooo:rsid="0061fe77"/>
    </style:style>
    <style:style style:name="T31" style:family="text">
      <style:text-properties officeooo:rsid="002d3abb"/>
    </style:style>
    <style:style style:name="T32" style:family="text">
      <style:text-properties officeooo:rsid="003213e1"/>
    </style:style>
    <style:style style:name="T33" style:family="text">
      <style:text-properties officeooo:rsid="00338468"/>
    </style:style>
    <style:style style:name="T34" style:family="text">
      <style:text-properties officeooo:rsid="002fbfe9"/>
    </style:style>
    <style:style style:name="T35" style:family="text">
      <style:text-properties fo:font-weight="bold" officeooo:rsid="002a657c" style:font-weight-asian="bold" style:font-weight-complex="bold"/>
    </style:style>
    <style:style style:name="T36" style:family="text">
      <style:text-properties officeooo:rsid="002a657c"/>
    </style:style>
    <style:style style:name="T37" style:family="text">
      <style:text-properties fo:font-weight="normal" officeooo:rsid="002a657c" style:font-weight-asian="normal" style:font-weight-complex="normal"/>
    </style:style>
    <style:style style:name="T38" style:family="text">
      <style:text-properties fo:font-weight="bold" officeooo:rsid="002a657c" style:font-weight-asian="bold" style:font-family-complex="'Galaxie Unicode Hebrew'" style:font-pitch-complex="variable" style:font-weight-complex="bold"/>
    </style:style>
    <style:style style:name="T39" style:family="text">
      <style:text-properties officeooo:rsid="002a657c" style:font-family-complex="'Galaxie Unicode Hebrew'" style:font-pitch-complex="variable"/>
    </style:style>
    <style:style style:name="T40" style:family="text">
      <style:text-properties officeooo:rsid="003dceb4"/>
    </style:style>
    <style:style style:name="T41" style:family="text">
      <style:text-properties fo:color="#127622" loext:opacity="100%" officeooo:rsid="003dceb4"/>
    </style:style>
    <style:style style:name="T42" style:family="text">
      <style:text-properties officeooo:rsid="00453920"/>
    </style:style>
    <style:style style:name="T43" style:family="text">
      <style:text-properties officeooo:rsid="00353703"/>
    </style:style>
    <style:style style:name="T44" style:family="text">
      <style:text-properties officeooo:rsid="006460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“the dangers of unchecked tradition”</text:p>
      <text:p text:style-name="P2"/>
      <text:p text:style-name="P3"><text:span text:style-name="T1">All the</text:span><text:span text:style-name="T2"> data </text:span><text:span text:style-name="T3">and associated references </text:span><text:span text:style-name="T2">used in this letter can most easily be viewed </text:span><text:span text:style-name="T3">at </text:span><text:span text:style-name="T2">the following URL:</text:span></text:p>
      <text:p text:style-name="P4"><text:a xlink:type="simple" xlink:href="https://cheerful-wmcdannell.wordpress.com/2025/08/05/kings-of-judah-israel-timeline-biblical-data-only-wip/" text:style-name="Internet_20_link" text:visited-style-name="Visited_20_Internet_20_Link"><text:span text:style-name="T4">https://cheerful-wmcdannell.wordpress.com/2025/08/05/kings-of-judah-israel-timeline-biblical-data-only-wip</text:span></text:a></text:p>
      <text:p text:style-name="P5"/>
      <text:p text:style-name="P6"><text:span text:style-name="T5">Premise</text:span>:</text:p>
      <text:p text:style-name="P7">Jerome, Flavius Josephus, the Seder Olam Rabbah (Talmud), the Targum of Jonathan, Louis Ginzberg, Adam Clarke, and Matthew Henry’s commentary all assert or give (only) the impression that the earthquake <text:span text:style-name="T6">(</text:span><text:span text:style-name="T7">Amos 1:1</text:span><text:span text:style-name="T6">, </text:span><text:span text:style-name="T7">6:11</text:span><text:span text:style-name="T6">, </text:span><text:span text:style-name="T7">Zec 14:5</text:span><text:span text:style-name="T6">) </text:span>that occurred during the reign of Azariah/Uzziah/Ozias occurred at the same time as his transgression in the temple. <text:span text:style-name="T8">It certainly </text:span><text:span text:style-name="T9">sounds</text:span><text:span text:style-name="T10"> good a</text:span><text:span text:style-name="T11">nd</text:span><text:span text:style-name="T10"> also creates a dramatic story. However, there’s a problem: that’s </text:span><text:span text:style-name="T12">not the story that the Bible </text:span><text:span text:style-name="T13">teaches</text:span><text:span text:style-name="T12"> us</text:span><text:span text:style-name="T14"> (</text:span><text:span text:style-name="T15">1Thess 5:21</text:span><text:span text:style-name="T14">).</text:span></text:p>
      <text:p text:style-name="P8"/>
      <text:p text:style-name="P9"><text:span text:style-name="T5">Analysis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draw:frame draw:style-name="fr1" draw:name="Image1" text:anchor-type="as-char" svg:width="7.4193in" svg:height="5.022in" draw:z-index="0"><draw:image xlink:href="Pictures/10000001000004D90000034888531029.png" xlink:type="simple" xlink:show="embed" xlink:actuate="onLoad" draw:mime-type="image/png"/></draw:frame></text:p>
          </table:table-cell>
        </table:table-row>
      </table:table>
      <text:p text:style-name="P9"/>
      <text:p text:style-name="P11">Uzziah’s reign began in the 27<text:span text:style-name="T16">th</text:span> year of Jeroboam <text:span text:style-name="T17">(</text:span>II<text:span text:style-name="T17">)</text:span> king of Israel <text:span text:style-name="T18">(</text:span><text:span text:style-name="T19">2Ki 15:1</text:span><text:span text:style-name="T18">)</text:span>. That gives us <text:span text:style-name="T20">two</text:span> 14 year period<text:span text:style-name="T20">s</text:span> where <text:span text:style-name="T21">both events of</text:span> <text:span text:style-name="T22">Amos 1:1</text:span> occurred, the latest date <text:span text:style-name="T23">of which </text:span><text:span text:style-name="T24">is the </text:span>16<text:span text:style-name="T16">th</text:span> year of Uzziah’s reign. <text:span text:style-name="T25">Uzziah’s son Jotham, who </text:span><text:span text:style-name="T26">was judge over the king’s house before his reign began</text:span><text:span text:style-name="T25"> (</text:span><text:span text:style-name="T27">2Ki 15:5</text:span><text:span text:style-name="T25">, </text:span><text:span text:style-name="T27">2Ch 26:21</text:span><text:span text:style-name="T25">) wasn’t even born until the 29</text:span><text:span text:style-name="T28">th</text:span><text:span text:style-name="T25"> year of Uzziah’s reign </text:span><text:span text:style-name="T29">(</text:span><text:span text:style-name="T30">see full chart for all references</text:span><text:span text:style-name="T29">; </text:span><text:span text:style-name="T31">Jotham/</text:span><text:span text:style-name="T32">Joatham </text:span><text:span text:style-name="T33">son of Uzziah</text:span><text:span text:style-name="T31"> began reigning at age 25 two years after the end of Uzziah’s </text:span><text:span text:style-name="T34">52 year </text:span><text:span text:style-name="T31">reign</text:span><text:span text:style-name="T29">)</text:span><text:span text:style-name="T25">.</text:span></text:p>
      <text:p text:style-name="P2"/>
      <text:p text:style-name="P2">Therefore, “<text:span text:style-name="T35">the</text:span><text:span text:style-name="T36"> </text:span><text:span text:style-name="T37">earthquake</text:span>”<text:span text:style-name="T36"> </text:span><text:span text:style-name="T38">הָ</text:span><text:span text:style-name="T39">רָעַשׁ</text:span><text:span text:style-name="T36"> (</text:span><text:span text:style-name="T35">ha</text:span><text:span text:style-name="T36">-ra‘ash) </text:span><text:span text:style-name="T40">(</text:span><text:span text:style-name="T41">Amos 1:1</text:span><text:span text:style-name="T40">, </text:span><text:span text:style-name="T41">Zech 14:5</text:span><text:span text:style-name="T40">) </text:span><text:span text:style-name="T36">occurred during the former half of Uzziah’s reign and his transgression in the temple occurred in the latter half of his reign. </text:span><text:span text:style-name="T42">These facts </text:span><text:span text:style-name="T43">sufficiently </text:span><text:span text:style-name="T42">separate</text:span><text:span text:style-name="T43"> both events by enough time for us to know with certainty that they could </text:span><text:span text:style-name="T44">not</text:span><text:span text:style-name="T43"> have occurred at the same t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0:26:39.428768000</meta:creation-date>
    <dc:title>default</dc:title>
    <meta:editing-duration>PT2H56M45S</meta:editing-duration>
    <meta:editing-cycles>74</meta:editing-cycles>
    <meta:generator>LibreOffice/26.2.4.2$Linux_X86_64 LibreOffice_project/64a984c51f4702dbd3710b13428c673a2f1292e7</meta:generator>
    <dc:date>2026-07-11T12:19:43.344394950</dc:date>
    <meta:document-statistic meta:table-count="1" meta:image-count="1" meta:object-count="0" meta:page-count="1" meta:paragraph-count="9" meta:word-count="256" meta:character-count="1616" meta:non-whitespace-character-count="1368"/>
    <meta:template xlink:type="simple" xlink:actuate="onRequest" xlink:title="default" xlink:href="../../../../AppData/Roaming/LibreOffice/4/user/template/default1.ott" meta:date="2026-02-16T10:26:38.866592200"/>
  </office:meta>
</office:document-meta>
</file>