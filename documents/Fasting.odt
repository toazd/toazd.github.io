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4.ttf" manifest:media-type="application/x-font-ttf"/>
  <manifest:file-entry manifest:full-path="Fonts/Font_Gabriela_Nerd_Font_1.ttf" manifest:media-type="application/x-font-ttf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Liberation_Sans_2.ttf" manifest:media-type="application/x-font-ttf"/>
  <manifest:file-entry manifest:full-path="Fonts/Font_Lucida_Sans_2.ttf" manifest:media-type="application/x-font-ttf"/>
  <manifest:file-entry manifest:full-path="Fonts/Font_Liberation_Sans_3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officeooo:rsid="00128811" officeooo:paragraph-rsid="00128811"/>
    </style:style>
    <style:style style:name="P2" style:family="paragraph" style:parent-style-name="Standard">
      <style:text-properties officeooo:rsid="00128811" officeooo:paragraph-rsid="00128811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the Biblical definition of fasting?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Esther 4:15-17</text:span><text:line-break/><text:span text:style-name="T2">15</text:span> Then Esther bade <text:span text:style-name="T3">them</text:span> return Mordecai <text:span text:style-name="T3">this answer</text:span>, <text:line-break/><text:span text:style-name="T2">16</text:span> Go, gather together all the Jews that are present in Shushan, <text:span text:style-name="T4">and fast ye for me, and neither eat nor drink three days, night or day</text:span>: I also and my maidens will fast likewise; and so will I go in unto the king, which <text:span text:style-name="T3">is</text:span> not according to the law: and if I perish, I perish. <text:line-break/><text:span text:style-name="T2">17</text:span> So Mordecai went his way, and did according to all that Esther had commanded him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Jonah 3:5-7</text:span><text:line-break/><text:span text:style-name="T2">5</text:span> So the people of Nineveh believed God, and <text:span text:style-name="T4">proclaimed a fast</text:span>, and put on sackcloth, from the greatest of them even to the least of them. <text:line-break/><text:span text:style-name="T2">6</text:span> For word came unto the king of Nineveh, and he arose from his throne, and he laid his robe from him, and covered <text:span text:style-name="T3">him</text:span> with sackcloth, and sat in ashes. <text:line-break/><text:span text:style-name="T2">7</text:span> And he caused <text:span text:style-name="T3">it</text:span> to be proclaimed and published through Nineveh by the decree of the king and his nobles, saying, <text:span text:style-name="T4">Let neither man nor beast, herd nor flock, taste any thing: let them not feed, nor drink water:</text:span></text:p>
          </table:table-cell>
        </table:table-row>
      </table:table>
      <text:p text:style-name="Standard"/>
      <text:p text:style-name="Standard"/>
      <text:p text:style-name="P2">It appears to be abstaining from both food and wat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5:37:49.847766800</meta:creation-date>
    <meta:editing-cycles>4</meta:editing-cycles>
    <meta:editing-duration>PT9M1S</meta:editing-duration>
    <dc:title>Fasting</dc:title>
    <dc:date>2025-08-17T15:47:48.008453900</dc:date>
    <meta:generator>LibreOffice/25.2.5.2$Windows_X86_64 LibreOffice_project/03d19516eb2e1dd5d4ccd751a0d6f35f35e08022</meta:generator>
    <meta:document-statistic meta:table-count="2" meta:image-count="0" meta:object-count="0" meta:page-count="1" meta:paragraph-count="4" meta:word-count="201" meta:character-count="1044" meta:non-whitespace-character-count="843"/>
  </office:meta>
</office:document-meta>
</file>