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officeooo:paragraph-rsid="000ff206"/>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style:style style:name="T4" style:family="text">
      <style:text-properties style:font-name-complex="Google Sans Text" style:font-weight-complex="bold"/>
    </style:style>
    <style:style style:name="T5" style:family="text">
      <style:text-properties style:font-name-complex="Google Sans Text"/>
    </style:style>
    <style:style style:name="T6" style:family="text">
      <style:text-properties fo:font-style="italic"/>
    </style:style>
    <style:style style:name="T7" style:family="text">
      <style:text-properties style:font-family-complex="'Galaxie Unicode Hebrew'" style:font-pitch-complex="variable" style:font-weight-complex="bold"/>
    </style:style>
    <style:style style:name="T8" style:family="text">
      <style:text-properties officeooo:rsid="000ff206" style:font-name-complex="Google Sans Text" style:font-weight-complex="bol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f0df53188bed99e1">
        <text:h text:style-name="P1" text:outline-level="3">First Temple Period (c. 957 - 586 BCE)</text:h>
        <text:list text:style-name="L1">
          <text:list-item>
            <text:p text:style-name="P2"><text:span text:style-name="T1">Script:</text:span> Paleo-Hebrew. This script is an early form of the Hebrew alphabet, closely related to the Phoenician alphabet. It has a more pictographic appearance than the later square script. This would have been the script used during the time of the First Temple in Jerusalem, built by King Solomon.</text:p>
          </text:list-item>
          <text:list-item>
            <text:p text:style-name="P3"><text:span text:style-name="T2">Phrase:</text:span><text:span text:style-name="T3"> </text:span><text:span text:style-name="T4">𐤒𐤃𐤔</text:span><text:span text:style-name="T5"> </text:span><text:span text:style-name="T4">𐤋𐤉𐤄𐤅𐤄</text:span></text:p>
          </text:list-item>
          <text:list-item>
            <text:p text:style-name="P2"><text:span text:style-name="T1">Pronunciation:</text:span> <text:span text:style-name="T6">Kodesh L'Adonai</text:span></text:p>
          </text:list-item>
          <text:list-item>
            <text:p text:style-name="P2"><text:span text:style-name="T1">Notes:</text:span> This is the script used on early inscriptions like the <text:span text:style-name="T1">Gezer Calendar</text:span> and the <text:span text:style-name="T1">Siloam Inscription</text:span>.</text:p>
          </text:list-item>
        </text:list>
        <text:p text:style-name="Horizontal_20_Line"/>
        <text:h text:style-name="P1" text:outline-level="3">Second Temple Period (c. 516 BCE - 70 CE)</text:h>
        <text:list text:style-name="L2">
          <text:list-item>
            <text:p text:style-name="P4"><text:span text:style-name="T1">Script:</text:span> Square Hebrew (Ashuri Script). This script, which is still in use today, was adopted from the Aramaic alphabet during the Babylonian exile. It became the standard script for writing Hebrew religious texts, including the later books of the Bible.</text:p>
          </text:list-item>
          <text:list-item>
            <text:p text:style-name="P5"><text:span text:style-name="T2">Phrase:</text:span><text:span text:style-name="T3"> </text:span><text:span text:style-name="T7">קֹדֶשׁ לַיהוָה</text:span><text:span text:style-name="T8">) קֹדֶשׁ לַיהוָה)</text:span></text:p>
          </text:list-item>
          <text:list-item>
            <text:p text:style-name="P4"><text:span text:style-name="T1">Pronunciation:</text:span> <text:span text:style-name="T6">Kodesh L'Adonai</text:span></text:p>
          </text:list-item>
          <text:list-item>
            <text:p text:style-name="P4"><text:span text:style-name="T1">Notes:</text:span> This is the script found in the <text:span text:style-name="T1">Dead Sea Scrolls</text:span> and the <text:span text:style-name="T1">Masoretic Text</text:span> of the Hebrew Bible. It is also the script used in Psalm 119.</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19:48:12.616474200</meta:creation-date>
    <dc:title>default</dc:title>
    <meta:editing-duration>PT1M52S</meta:editing-duration>
    <meta:editing-cycles>5</meta:editing-cycles>
    <meta:generator>LibreOffice/26.2.4.2$Linux_X86_64 LibreOffice_project/64a984c51f4702dbd3710b13428c673a2f1292e7</meta:generator>
    <dc:date>2026-07-11T12:30:10.356040342</dc:date>
    <meta:document-statistic meta:table-count="0" meta:image-count="0" meta:object-count="0" meta:page-count="1" meta:paragraph-count="10" meta:word-count="173" meta:character-count="986" meta:non-whitespace-character-count="831"/>
    <meta:template xlink:type="simple" xlink:actuate="onRequest" xlink:title="default" xlink:href="../../../../AppData/Roaming/LibreOffice/4/user/template/default.ott" meta:date="2025-09-04T19:48:11.507858000"/>
  </office:meta>
</office:document-meta>
</file>