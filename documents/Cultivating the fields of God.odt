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75pt solid #000000"/>
    </style:style>
    <style:style style:name="Table3.A2" style:family="table-cell">
      <style:table-cell-properties fo:padding="0.0382in" fo:border-left="0.75pt solid #000000" fo:border-right="0.75pt solid #000000" fo:border-top="none" fo:border-bottom="0.7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2.7194in" style:rel-column-width="22562*"/>
    </style:style>
    <style:style style:name="Table2.B" style:family="table-column">
      <style:table-column-properties style:column-width="2.9444in" style:rel-column-width="24428*"/>
    </style:style>
    <style:style style:name="Table2.C" style:family="table-column">
      <style:table-column-properties style:column-width="2.2354in" style:rel-column-width="18545*"/>
    </style:style>
    <style:style style:name="Table2.1" style:family="table-row">
      <style:table-row-properties style:min-row-height="4.5972in"/>
    </style:style>
    <style:style style:name="Table2.A1" style:family="table-cell">
      <style:table-cell-properties fo:padding="0.0382in" fo:border-left="0.75pt solid #000000" fo:border-right="none" fo:border-top="0.75pt solid #000000" fo:border-bottom="0.75pt solid #000000"/>
    </style:style>
    <style:style style:name="Table2.C1" style:family="table-cell">
      <style:table-cell-properties fo:padding="0.0382in" fo:border="0.75pt solid #000000"/>
    </style:style>
    <style:style style:name="Table2.A2" style:family="table-cell">
      <style:table-cell-properties fo:padding="0.0382in" fo:border-left="0.75pt solid #000000" fo:border-right="none" fo:border-top="none" fo:border-bottom="0.75pt solid #000000"/>
    </style:style>
    <style:style style:name="Table2.C2" style:family="table-cell">
      <style:table-cell-properties fo:padding="0.0382in" fo:border-left="0.75pt solid #000000" fo:border-right="0.75pt solid #000000" fo:border-top="none" fo:border-bottom="0.7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3.95in" style:rel-column-width="32767*"/>
    </style:style>
    <style:style style:name="Table7.B" style:family="table-column">
      <style:table-column-properties style:column-width="3.95in" style:rel-column-width="32768*"/>
    </style:style>
    <style:style style:name="Table7.1" style:family="table-row">
      <style:table-row-properties style:min-row-height="0.2222in"/>
    </style:style>
    <style:style style:name="Table7.A1" style:family="table-cell">
      <style:table-cell-properties fo:padding="0.0382in" fo:border-left="0.75pt solid #000000" fo:border-right="none" fo:border-top="0.75pt solid #000000" fo:border-bottom="0.75pt solid #000000"/>
    </style:style>
    <style:style style:name="Table7.B1" style:family="table-cell">
      <style:table-cell-properties fo:padding="0.0382in" fo:border="0.75pt solid #000000"/>
    </style:style>
    <style:style style:name="Table7.A2" style:family="table-cell">
      <style:table-cell-properties fo:padding="0.0382in" fo:border-left="0.75pt solid #000000" fo:border-right="none" fo:border-top="none" fo:border-bottom="0.75pt solid #000000"/>
    </style:style>
    <style:style style:name="Table7.B2" style:family="table-cell">
      <style:table-cell-properties fo:padding="0.0382in" fo:border-left="0.75pt solid #000000" fo:border-right="0.75pt solid #000000" fo:border-top="none" fo:border-bottom="0.7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75pt solid #000000"/>
    </style:style>
    <style:style style:name="Table9.A2" style:family="table-cell">
      <style:table-cell-properties fo:padding="0.0382in" fo:border-left="0.75pt solid #000000" fo:border-right="0.75pt solid #000000" fo:border-top="none" fo:border-bottom="0.7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4.0333in" style:rel-column-width="33458*"/>
    </style:style>
    <style:style style:name="Table5.B" style:family="table-column">
      <style:table-column-properties style:column-width="3.8667in" style:rel-column-width="32077*"/>
    </style:style>
    <style:style style:name="Table5.A1" style:family="table-cell">
      <style:table-cell-properties fo:padding="0.0382in" fo:border-left="0.75pt solid #000000" fo:border-right="none" fo:border-top="0.75pt solid #000000" fo:border-bottom="0.75pt solid #000000"/>
    </style:style>
    <style:style style:name="Table5.B1" style:family="table-cell">
      <style:table-cell-properties fo:padding="0.0382in" fo:border="0.75pt solid #000000"/>
    </style:style>
    <style:style style:name="P1" style:family="paragraph" style:parent-style-name="Standard">
      <style:paragraph-properties fo:text-align="center" style:justify-single-word="false"/>
      <style:text-properties style:font-name="Gabriela Nerd Font" fo:font-size="14pt" officeooo:rsid="00115bc9" officeooo:paragraph-rsid="00115bc9" style:font-size-asian="14pt" style:font-size-complex="14pt"/>
    </style:style>
    <style:style style:name="P2" style:family="paragraph" style:parent-style-name="Standard">
      <style:paragraph-properties fo:text-align="center" style:justify-single-word="false"/>
      <style:text-properties style:font-name="Gabriela Nerd Font" fo:font-size="10pt" officeooo:rsid="00115bc9" officeooo:paragraph-rsid="00115bc9" style:font-size-asian="10pt" style:font-size-complex="10pt"/>
    </style:style>
    <style:style style:name="P3" style:family="paragraph" style:parent-style-name="Standard">
      <style:paragraph-properties fo:text-align="left" style:justify-single-word="false"/>
      <style:text-properties style:font-name="Liberation Sans" fo:font-size="12pt" officeooo:rsid="00115bc9" officeooo:paragraph-rsid="00115bc9" style:font-size-asian="12pt" style:font-size-complex="12pt"/>
    </style:style>
    <style:style style:name="P4" style:family="paragraph" style:parent-style-name="Standard">
      <style:paragraph-properties fo:text-align="left" style:justify-single-word="false"/>
      <style:text-properties style:font-name="Liberation Sans" fo:font-size="12pt" officeooo:rsid="00146ba9" officeooo:paragraph-rsid="00146ba9" style:font-size-asian="12pt" style:font-size-complex="12pt"/>
    </style:style>
    <style:style style:name="P5" style:family="paragraph" style:parent-style-name="Table_20_Contents">
      <style:paragraph-properties fo:text-align="left" style:justify-single-word="false"/>
      <style:text-properties fo:font-size="12pt" officeooo:paragraph-rsid="0012c06c" style:font-size-asian="12pt" style:font-size-complex="12pt"/>
    </style:style>
    <style:style style:name="P6" style:family="paragraph" style:parent-style-name="Standard" style:list-style-name="L1">
      <style:paragraph-properties fo:text-align="left" style:justify-single-word="false"/>
      <style:text-properties officeooo:paragraph-rsid="0016fe3f"/>
    </style:style>
    <style:style style:name="P7" style:family="paragraph" style:parent-style-name="Standard" style:list-style-name="L1">
      <style:paragraph-properties fo:text-align="left" style:justify-single-word="false"/>
      <style:text-properties style:font-name="Liberation Sans" fo:font-size="12pt" officeooo:rsid="0016fe3f" officeooo:paragraph-rsid="0016fe3f" style:font-size-asian="12pt" style:font-size-complex="12pt"/>
    </style:style>
    <style:style style:name="P8" style:family="paragraph" style:parent-style-name="Standard" style:list-style-name="L1">
      <style:paragraph-properties fo:text-align="left" style:justify-single-word="false"/>
      <style:text-properties style:font-name="Liberation Sans" fo:font-size="12pt" officeooo:rsid="00254bb1" officeooo:paragraph-rsid="00254bb1" style:font-size-asian="12pt" style:font-size-complex="12pt"/>
    </style:style>
    <style:style style:name="P9" style:family="paragraph" style:parent-style-name="Standard">
      <style:paragraph-properties fo:text-align="left" style:justify-single-word="false"/>
      <style:text-properties style:font-name="Liberation Sans" fo:font-size="12pt" officeooo:rsid="00115bc9" officeooo:paragraph-rsid="0077039f" style:font-size-asian="12pt" style:font-size-complex="12pt"/>
    </style:style>
    <style:style style:name="P10" style:family="paragraph" style:parent-style-name="Table_20_Contents">
      <style:paragraph-properties fo:text-align="left" style:justify-single-word="false"/>
      <style:text-properties fo:font-size="12pt" officeooo:paragraph-rsid="0077039f" style:font-size-asian="12pt" style:font-size-complex="12pt"/>
    </style:style>
    <style:style style:name="P11" style:family="paragraph" style:parent-style-name="Standard" style:list-style-name="L2">
      <style:paragraph-properties fo:text-align="left" style:justify-single-word="false"/>
      <style:text-properties style:font-name="Liberation Sans" fo:font-size="12pt" officeooo:rsid="00140f5d" officeooo:paragraph-rsid="0077039f" style:font-size-asian="12pt" style:font-size-complex="12pt"/>
    </style:style>
    <style:style style:name="P12" style:family="paragraph" style:parent-style-name="Standard" style:list-style-name="L2">
      <style:paragraph-properties fo:text-align="left" style:justify-single-word="false"/>
      <style:text-properties style:font-name="Liberation Sans" fo:font-size="12pt" officeooo:rsid="001fa0ef" officeooo:paragraph-rsid="0077039f" style:font-size-asian="12pt" style:font-size-complex="12pt"/>
    </style:style>
    <style:style style:name="P13" style:family="paragraph" style:parent-style-name="Standard" style:list-style-name="L2">
      <style:paragraph-properties fo:text-align="left" style:justify-single-word="false"/>
      <style:text-properties style:font-name="Liberation Sans" fo:font-size="12pt" officeooo:rsid="001fa0ef" officeooo:paragraph-rsid="00784906" style:font-size-asian="12pt" style:font-size-complex="12pt"/>
    </style:style>
    <style:style style:name="P14" style:family="paragraph" style:parent-style-name="Standard">
      <style:paragraph-properties fo:text-align="left" style:justify-single-word="false"/>
      <style:text-properties style:font-name="Liberation Sans" fo:font-size="12pt" officeooo:rsid="001fa0ef" officeooo:paragraph-rsid="0077039f" style:font-size-asian="12pt" style:font-size-complex="12pt"/>
    </style:style>
    <style:style style:name="P15" style:family="paragraph" style:parent-style-name="Table_20_Contents">
      <style:paragraph-properties fo:text-align="left" style:justify-single-word="false"/>
      <style:text-properties fo:font-size="12pt" officeooo:paragraph-rsid="00182506" style:font-size-asian="12pt" style:font-size-complex="12pt"/>
    </style:style>
    <style:style style:name="P16" style:family="paragraph" style:parent-style-name="Table_20_Contents">
      <style:paragraph-properties fo:text-align="left" style:justify-single-word="false"/>
      <style:text-properties fo:font-size="12pt" officeooo:paragraph-rsid="00753a01" style:font-size-asian="12pt" style:font-size-complex="12pt"/>
    </style:style>
    <style:style style:name="P17" style:family="paragraph" style:parent-style-name="Table_20_Contents">
      <style:paragraph-properties fo:text-align="left" style:justify-single-word="false"/>
      <style:text-properties fo:font-size="12pt" officeooo:paragraph-rsid="007435bd" style:font-size-asian="12pt" style:font-size-complex="12pt"/>
    </style:style>
    <style:style style:name="P18" style:family="paragraph" style:parent-style-name="Standard" style:list-style-name="L3">
      <style:paragraph-properties fo:text-align="left" style:justify-single-word="false"/>
      <style:text-properties style:font-name="Liberation Sans" fo:font-size="12pt" officeooo:rsid="0019205d" officeooo:paragraph-rsid="007e1067" style:font-size-asian="12pt" style:font-size-complex="12pt"/>
    </style:style>
    <style:style style:name="P19" style:family="paragraph" style:parent-style-name="Standard" style:list-style-name="L3">
      <style:paragraph-properties fo:text-align="left" style:justify-single-word="false"/>
      <style:text-properties style:font-name="Liberation Sans" fo:font-size="12pt" officeooo:rsid="002c972c" officeooo:paragraph-rsid="007e1067" style:font-size-asian="12pt" style:font-size-complex="12pt"/>
    </style:style>
    <style:style style:name="P20" style:family="paragraph" style:parent-style-name="Standard" style:list-style-name="L3">
      <style:paragraph-properties fo:text-align="left" style:justify-single-word="false"/>
      <style:text-properties style:font-name="Liberation Sans" fo:font-size="12pt" officeooo:rsid="009da90a" officeooo:paragraph-rsid="009da90a" style:font-size-asian="12pt" style:font-size-complex="12pt"/>
    </style:style>
    <style:style style:name="P21" style:family="paragraph" style:parent-style-name="Standard" style:list-style-name="L3">
      <style:paragraph-properties fo:text-align="left" style:justify-single-word="false"/>
      <style:text-properties style:font-name="Liberation Sans" fo:font-size="12pt" officeooo:rsid="002c972c" officeooo:paragraph-rsid="002c972c" style:font-size-asian="12pt" style:font-size-complex="12pt"/>
    </style:style>
    <style:style style:name="P22" style:family="paragraph" style:parent-style-name="Standard" style:list-style-name="L3">
      <style:paragraph-properties fo:text-align="left" style:justify-single-word="false"/>
      <style:text-properties style:font-name="Liberation Sans" fo:font-size="12pt" officeooo:rsid="007423ee" officeooo:paragraph-rsid="007423ee" style:font-size-asian="12pt" style:font-size-complex="12pt"/>
    </style:style>
    <style:style style:name="P23" style:family="paragraph" style:parent-style-name="Standard" style:list-style-name="L3">
      <style:paragraph-properties fo:text-align="left" style:justify-single-word="false"/>
      <style:text-properties style:font-name="Liberation Sans" fo:font-size="12pt" officeooo:rsid="00799327" officeooo:paragraph-rsid="00799327" style:font-size-asian="12pt" style:font-size-complex="12pt"/>
    </style:style>
    <style:style style:name="P24" style:family="paragraph" style:parent-style-name="Standard">
      <style:paragraph-properties fo:text-align="left" style:justify-single-word="false"/>
      <style:text-properties style:font-name="Liberation Sans" fo:font-size="12pt" officeooo:rsid="001fa0ef" officeooo:paragraph-rsid="00115bc9" style:font-size-asian="12pt" style:font-size-complex="12pt"/>
    </style:style>
    <style:style style:name="P25" style:family="paragraph" style:parent-style-name="Standard">
      <style:paragraph-properties fo:text-align="center" style:justify-single-word="false"/>
      <style:text-properties style:font-name="Liberation Sans" fo:font-size="12pt" officeooo:rsid="0080f52e" officeooo:paragraph-rsid="0080f52e" style:font-size-asian="12pt" style:font-size-complex="12pt"/>
    </style:style>
    <style:style style:name="P26" style:family="paragraph" style:parent-style-name="Table_20_Contents">
      <style:paragraph-properties fo:text-align="left" style:justify-single-word="false"/>
    </style:style>
    <style:style style:name="P27" style:family="paragraph" style:parent-style-name="Standard">
      <style:paragraph-properties fo:text-align="center" style:justify-single-word="false"/>
      <style:text-properties style:font-name="Gabriela Nerd Font" officeooo:rsid="008252dc" officeooo:paragraph-rsid="008252dc"/>
    </style:style>
    <style:style style:name="P28" style:family="paragraph" style:parent-style-name="Table_20_Contents">
      <style:paragraph-properties fo:text-align="left" style:justify-single-word="false"/>
      <style:text-properties fo:font-size="12pt" officeooo:paragraph-rsid="0032231e" style:font-size-asian="12pt" style:font-size-complex="12pt"/>
    </style:style>
    <style:style style:name="P29" style:family="paragraph" style:parent-style-name="Table_20_Contents">
      <style:paragraph-properties fo:text-align="left" style:justify-single-word="false"/>
      <style:text-properties fo:font-size="12pt" officeooo:paragraph-rsid="003447fd" style:font-size-asian="12pt" style:font-size-complex="12pt"/>
    </style:style>
    <style:style style:name="P30" style:family="paragraph" style:parent-style-name="Table_20_Contents">
      <style:paragraph-properties fo:text-align="left" style:justify-single-word="false"/>
      <style:text-properties fo:font-size="12pt" officeooo:paragraph-rsid="0034698d" style:font-size-asian="12pt" style:font-size-complex="12pt"/>
    </style:style>
    <style:style style:name="P31" style:family="paragraph" style:parent-style-name="Table_20_Contents">
      <style:paragraph-properties fo:text-align="left" style:justify-single-word="false"/>
      <style:text-properties fo:font-size="12pt" officeooo:paragraph-rsid="0032ee41" style:font-size-asian="12pt" style:font-size-complex="12pt"/>
    </style:style>
    <style:style style:name="P32" style:family="paragraph" style:parent-style-name="Table_20_Contents">
      <style:paragraph-properties fo:text-align="left" style:justify-single-word="false"/>
      <style:text-properties fo:font-size="12pt" officeooo:paragraph-rsid="00351b45" style:font-size-asian="12pt" style:font-size-complex="12pt"/>
    </style:style>
    <style:style style:name="P33" style:family="paragraph" style:parent-style-name="Table_20_Contents">
      <style:paragraph-properties fo:text-align="left" style:justify-single-word="false"/>
      <style:text-properties fo:font-size="12pt" officeooo:paragraph-rsid="00351b45" fo:background-color="transparent" style:font-size-asian="12pt" style:font-size-complex="12pt"/>
    </style:style>
    <style:style style:name="P34" style:family="paragraph" style:parent-style-name="Standard" style:list-style-name="L4">
      <style:paragraph-properties fo:text-align="left" style:justify-single-word="false"/>
      <style:text-properties style:font-name="Liberation Sans" fo:font-size="12pt" officeooo:rsid="003f3c24" officeooo:paragraph-rsid="003f3c24" style:font-size-asian="12pt" style:font-size-complex="12pt"/>
    </style:style>
    <style:style style:name="P35" style:family="paragraph" style:parent-style-name="Standard" style:list-style-name="L4">
      <style:paragraph-properties fo:text-align="left" style:justify-single-word="false"/>
      <style:text-properties style:font-name="Liberation Sans" fo:font-size="12pt" officeooo:rsid="00458f35" officeooo:paragraph-rsid="00458f35" style:font-size-asian="12pt" style:font-size-complex="12pt"/>
    </style:style>
    <style:style style:name="P36" style:family="paragraph" style:parent-style-name="Standard" style:list-style-name="L4">
      <style:paragraph-properties fo:text-align="left" style:justify-single-word="false"/>
      <style:text-properties style:font-name="Liberation Sans" fo:font-size="12pt" officeooo:rsid="00461c6c" officeooo:paragraph-rsid="00461c6c" style:font-size-asian="12pt" style:font-size-complex="12pt"/>
    </style:style>
    <style:style style:name="P37" style:family="paragraph" style:parent-style-name="Standard" style:list-style-name="L4">
      <style:paragraph-properties fo:text-align="left" style:justify-single-word="false"/>
      <style:text-properties style:font-name="Liberation Sans" fo:font-size="12pt" officeooo:rsid="00ae76f1" officeooo:paragraph-rsid="00ae76f1" style:font-size-asian="12pt" style:font-size-complex="12pt"/>
    </style:style>
    <style:style style:name="P38" style:family="paragraph" style:parent-style-name="Standard">
      <style:paragraph-properties fo:text-align="left" style:justify-single-word="false"/>
      <style:text-properties style:font-name="Liberation Sans" fo:font-size="12pt" officeooo:rsid="00467d03" officeooo:paragraph-rsid="00467d03" style:font-size-asian="12pt" style:font-size-complex="12pt"/>
    </style:style>
    <style:style style:name="P39" style:family="paragraph" style:parent-style-name="Standard" style:list-style-name="L4">
      <style:paragraph-properties fo:text-align="left" style:justify-single-word="false"/>
      <style:text-properties style:font-name="Liberation Sans" fo:font-size="12pt" officeooo:rsid="00467d03" officeooo:paragraph-rsid="00467d03" style:font-size-asian="12pt" style:font-size-complex="12pt"/>
    </style:style>
    <style:style style:name="P40" style:family="paragraph" style:parent-style-name="Standard" style:list-style-name="L4">
      <style:paragraph-properties fo:text-align="left" style:justify-single-word="false"/>
      <style:text-properties style:font-name="Liberation Sans" fo:font-size="12pt" officeooo:rsid="00afca88" officeooo:paragraph-rsid="00afca88" style:font-size-asian="12pt" style:font-size-complex="12pt"/>
    </style:style>
    <style:style style:name="P41" style:family="paragraph" style:parent-style-name="Table_20_Contents">
      <style:paragraph-properties fo:text-align="left" style:justify-single-word="false"/>
      <style:text-properties fo:font-size="12pt" officeooo:paragraph-rsid="00da6679" style:font-size-asian="12pt" style:font-size-complex="12pt"/>
    </style:style>
    <style:style style:name="P42" style:family="paragraph" style:parent-style-name="Standard" style:list-style-name="L5">
      <style:text-properties fo:font-size="12pt" officeooo:rsid="004940da" officeooo:paragraph-rsid="004ad082" style:font-size-asian="12pt" style:font-size-complex="12pt"/>
    </style:style>
    <style:style style:name="P43" style:family="paragraph" style:parent-style-name="Standard" style:list-style-name="L5">
      <style:text-properties fo:font-size="12pt" officeooo:rsid="004dd078" officeooo:paragraph-rsid="004dd078" style:font-size-asian="12pt" style:font-size-complex="12pt"/>
    </style:style>
    <style:style style:name="P44" style:family="paragraph" style:parent-style-name="Standard">
      <style:paragraph-properties fo:text-align="left" style:justify-single-word="false"/>
      <style:text-properties style:font-name="Liberation Sans" fo:font-size="12pt" fo:font-weight="bold" officeooo:rsid="003f3c24" officeooo:paragraph-rsid="003f3c24" style:font-size-asian="12pt" style:font-weight-asian="bold" style:font-size-complex="12pt" style:font-weight-complex="bold"/>
    </style:style>
    <style:style style:name="P45" style:family="paragraph" style:parent-style-name="Standard">
      <style:paragraph-properties fo:text-align="center" style:justify-single-word="false"/>
      <style:text-properties style:font-name="Liberation Sans" fo:font-size="12pt" fo:font-weight="bold" officeooo:rsid="00573959" officeooo:paragraph-rsid="00573959" style:font-size-asian="12pt" style:font-weight-asian="bold" style:font-size-complex="12pt" style:font-weight-complex="bold"/>
    </style:style>
    <style:style style:name="P46" style:family="paragraph" style:parent-style-name="Standard">
      <style:paragraph-properties fo:text-align="left" style:justify-single-word="false"/>
      <style:text-properties style:font-name="Liberation Sans" fo:font-size="12pt" officeooo:rsid="003f3c24" officeooo:paragraph-rsid="00573959" style:font-size-asian="12pt" style:font-size-complex="12pt"/>
    </style:style>
    <style:style style:name="P47" style:family="paragraph" style:parent-style-name="Standard">
      <style:paragraph-properties fo:text-align="left" style:justify-single-word="false"/>
      <style:text-properties style:font-name="Liberation Sans" fo:font-size="12pt" officeooo:rsid="0040770b" officeooo:paragraph-rsid="00573959" style:font-size-asian="12pt" style:font-size-complex="12pt"/>
    </style:style>
    <style:style style:name="P48" style:family="paragraph" style:parent-style-name="Table_20_Contents">
      <style:paragraph-properties fo:text-align="left"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fo:font-size="12pt" officeooo:rsid="0057b752" officeooo:paragraph-rsid="0057b752" style:font-size-asian="12pt" style:font-size-complex="12pt"/>
    </style:style>
    <style:style style:name="P50" style:family="paragraph" style:parent-style-name="Standard">
      <style:paragraph-properties fo:text-align="left" style:justify-single-word="false"/>
      <style:text-properties officeooo:paragraph-rsid="005b72a5"/>
    </style:style>
    <style:style style:name="P51" style:family="paragraph" style:parent-style-name="Standard">
      <style:paragraph-properties fo:text-align="left" style:justify-single-word="false"/>
      <style:text-properties style:font-name="Liberation Sans" fo:font-size="12pt" officeooo:rsid="0044725c" officeooo:paragraph-rsid="0044725c" style:font-size-asian="12pt" style:font-size-complex="12pt"/>
    </style:style>
    <style:style style:name="P52" style:family="paragraph" style:parent-style-name="Table_20_Contents">
      <style:paragraph-properties fo:text-align="left" style:justify-single-word="false"/>
      <style:text-properties fo:font-size="12pt" officeooo:paragraph-rsid="0059ea7b" style:font-size-asian="12pt" style:font-size-complex="12pt"/>
    </style:style>
    <style:style style:name="P53" style:family="paragraph" style:parent-style-name="Standard" style:list-style-name="L6">
      <style:paragraph-properties fo:text-align="left" style:justify-single-word="false"/>
      <style:text-properties style:font-name="Liberation Sans" fo:font-size="12pt" officeooo:rsid="00869b88" officeooo:paragraph-rsid="00869b88" style:font-size-asian="12pt" style:font-size-complex="12pt"/>
    </style:style>
    <style:style style:name="P54" style:family="paragraph" style:parent-style-name="Standard">
      <style:paragraph-properties fo:text-align="left" style:justify-single-word="false"/>
      <style:text-properties style:font-name="Liberation Sans" fo:font-size="12pt" officeooo:rsid="00869b88" officeooo:paragraph-rsid="00869b88" style:font-size-asian="12pt" style:font-size-complex="12pt"/>
    </style:style>
    <style:style style:name="P55" style:family="paragraph" style:parent-style-name="Standard">
      <style:paragraph-properties fo:text-align="left" style:justify-single-word="false"/>
      <style:text-properties style:font-name="Liberation Sans" fo:font-size="12pt" fo:font-style="normal" officeooo:rsid="008895cd" officeooo:paragraph-rsid="008895cd" style:font-size-asian="12pt" style:font-style-asian="normal" style:font-size-complex="12pt" style:font-style-complex="normal"/>
    </style:style>
    <style:style style:name="P56" style:family="paragraph" style:parent-style-name="Table_20_Contents">
      <style:paragraph-properties fo:text-align="left" style:justify-single-word="false"/>
      <style:text-properties fo:font-size="12pt" officeooo:paragraph-rsid="008895cd" style:font-size-asian="12pt" style:font-size-complex="12pt"/>
    </style:style>
    <style:style style:name="P57" style:family="paragraph" style:parent-style-name="Standard" style:list-style-name="L7">
      <style:paragraph-properties fo:text-align="left" style:justify-single-word="false"/>
      <style:text-properties style:font-name="Liberation Sans" fo:font-size="12pt" officeooo:rsid="008b8837" officeooo:paragraph-rsid="008b8837" style:font-size-asian="12pt" style:font-size-complex="12pt"/>
    </style:style>
    <style:style style:name="P58" style:family="paragraph" style:parent-style-name="Standard">
      <style:paragraph-properties fo:text-align="left" style:justify-single-word="false"/>
      <style:text-properties style:font-name="Liberation Sans" fo:font-size="12pt" officeooo:rsid="008b8837" officeooo:paragraph-rsid="008b8837" style:font-size-asian="12pt" style:font-size-complex="12pt"/>
    </style:style>
    <style:style style:name="P59" style:family="paragraph" style:parent-style-name="Standard">
      <style:paragraph-properties fo:text-align="left" style:justify-single-word="false"/>
      <style:text-properties style:font-name="Liberation Sans" fo:font-size="12pt" officeooo:rsid="00663cd8" officeooo:paragraph-rsid="00663cd8" style:font-size-asian="12pt" style:font-size-complex="12pt"/>
    </style:style>
    <style:style style:name="P60" style:family="paragraph" style:parent-style-name="Standard" style:list-style-name="L8">
      <style:paragraph-properties fo:text-align="left" style:justify-single-word="false"/>
      <style:text-properties officeooo:paragraph-rsid="00663cd8"/>
    </style:style>
    <style:style style:name="P61" style:family="paragraph" style:parent-style-name="Standard" style:list-style-name="L8">
      <style:paragraph-properties fo:text-align="left" style:justify-single-word="false"/>
      <style:text-properties style:font-name="Liberation Sans" fo:font-size="12pt" fo:font-style="normal" officeooo:rsid="00458f35" officeooo:paragraph-rsid="00663cd8" style:font-size-asian="12pt" style:font-style-asian="normal" style:font-size-complex="12pt" style:font-style-complex="normal"/>
    </style:style>
    <style:style style:name="P62" style:family="paragraph" style:parent-style-name="Standard" style:list-style-name="L8">
      <style:paragraph-properties fo:text-align="left" style:justify-single-word="false"/>
      <style:text-properties style:font-name="Liberation Sans" fo:font-size="12pt" fo:font-style="normal" officeooo:rsid="00663cd8" officeooo:paragraph-rsid="00663cd8" style:font-size-asian="12pt" style:font-style-asian="normal" style:font-size-complex="12pt" style:font-style-complex="normal"/>
    </style:style>
    <style:style style:name="P63" style:family="paragraph" style:parent-style-name="Standard" style:list-style-name="L8">
      <style:paragraph-properties fo:text-align="left" style:justify-single-word="false"/>
      <style:text-properties style:font-name="Liberation Sans" fo:font-size="12pt" fo:font-style="normal" officeooo:rsid="006c5553" officeooo:paragraph-rsid="006c5553" style:font-size-asian="12pt" style:font-style-asian="normal" style:font-size-complex="12pt" style:font-style-complex="normal"/>
    </style:style>
    <style:style style:name="P64" style:family="paragraph" style:parent-style-name="Standard" style:list-style-name="L8">
      <style:paragraph-properties fo:text-align="left" style:justify-single-word="false"/>
      <style:text-properties style:font-name="Liberation Sans" fo:font-size="12pt" fo:font-style="normal" officeooo:rsid="0070456b" officeooo:paragraph-rsid="0070456b" style:font-size-asian="12pt" style:font-style-asian="normal" style:font-size-complex="12pt" style:font-style-complex="normal"/>
    </style:style>
    <style:style style:name="P65" style:family="paragraph" style:parent-style-name="Standard" style:list-style-name="L8">
      <style:paragraph-properties fo:text-align="left" style:justify-single-word="false"/>
      <style:text-properties officeooo:paragraph-rsid="0067e2c8"/>
    </style:style>
    <style:style style:name="P66" style:family="paragraph" style:parent-style-name="Standard" style:list-style-name="L8">
      <style:paragraph-properties fo:text-align="left" style:justify-single-word="false"/>
      <style:text-properties style:font-name="Liberation Sans" fo:font-size="12pt" fo:font-style="normal" officeooo:rsid="006d61b6" officeooo:paragraph-rsid="006d61b6" style:font-size-asian="12pt" style:font-style-asian="normal" style:font-size-complex="12pt" style:font-style-complex="normal"/>
    </style:style>
    <style:style style:name="P67" style:family="paragraph" style:parent-style-name="Standard">
      <style:paragraph-properties fo:text-align="left" style:justify-single-word="false"/>
      <style:text-properties style:font-name="Liberation Sans" fo:font-size="12pt" fo:font-style="normal" officeooo:rsid="00458f35" officeooo:paragraph-rsid="00458f35" style:font-size-asian="12pt" style:font-style-asian="normal" style:font-size-complex="12pt" style:font-style-complex="normal"/>
    </style:style>
    <style:style style:name="P68" style:family="paragraph" style:parent-style-name="Standard">
      <style:paragraph-properties fo:text-align="left" style:justify-single-word="false"/>
      <style:text-properties style:font-name="Liberation Sans" fo:font-size="12pt" officeooo:rsid="00c8dec3" officeooo:paragraph-rsid="00458f35" style:font-size-asian="12pt" style:font-size-complex="12pt"/>
    </style:style>
    <style:style style:name="P69" style:family="paragraph" style:parent-style-name="Standard">
      <style:paragraph-properties fo:text-align="left" style:justify-single-word="false"/>
      <style:text-properties style:font-name="Liberation Sans" fo:font-size="12pt" officeooo:rsid="00d451b9" officeooo:paragraph-rsid="00d451b9" style:font-size-asian="12pt" style:font-size-complex="12pt"/>
    </style:style>
    <style:style style:name="P70" style:family="paragraph" style:parent-style-name="Standard">
      <style:paragraph-properties fo:text-align="left" style:justify-single-word="false"/>
      <style:text-properties style:font-name="Liberation Sans" fo:font-size="12pt" officeooo:rsid="001fa0ef" officeooo:paragraph-rsid="007e79c5" style:font-size-asian="12pt" style:font-size-complex="12pt"/>
    </style:style>
    <style:style style:name="P71" style:family="paragraph" style:parent-style-name="Table_20_Contents">
      <style:paragraph-properties fo:text-align="left" style:justify-single-word="false"/>
      <style:text-properties fo:font-size="12pt" officeooo:paragraph-rsid="007e79c5" fo:background-color="transparent" style:font-size-asian="12pt" style:font-size-complex="12pt"/>
    </style:style>
    <style:style style:name="P72" style:family="paragraph" style:parent-style-name="Table_20_Contents">
      <style:paragraph-properties fo:text-align="left" style:justify-single-word="false"/>
      <style:text-properties fo:font-size="12pt" officeooo:paragraph-rsid="00c6ff08" fo:background-color="transparent" style:font-size-asian="12pt" style:font-size-complex="12pt"/>
    </style:style>
    <style:style style:name="P73" style:family="paragraph" style:parent-style-name="Text_20_body">
      <style:paragraph-properties fo:text-align="left" style:justify-single-word="false"/>
      <style:text-properties style:font-name="Liberation Sans" fo:font-size="12pt" officeooo:rsid="003f3c24" officeooo:paragraph-rsid="007e79c5" style:font-size-asian="12pt" style:font-size-complex="12pt"/>
    </style:style>
    <style:style style:name="T1" style:family="text">
      <style:text-properties officeooo:rsid="00ddc05e"/>
    </style:style>
    <style:style style:name="T2" style:family="text">
      <style:text-properties officeooo:rsid="00e1e02f"/>
    </style:style>
    <style:style style:name="T3" style:family="text">
      <style:text-properties officeooo:rsid="00c9be5d"/>
    </style:style>
    <style:style style:name="T4" style:family="text">
      <style:text-properties officeooo:rsid="00976e70"/>
    </style:style>
    <style:style style:name="T5" style:family="text">
      <style:text-properties fo:font-weight="bold" style:font-weight-asian="bold" style:font-weight-complex="bold"/>
    </style:style>
    <style:style style:name="T6" style:family="text">
      <style:text-properties officeooo:rsid="001608d8"/>
    </style:style>
    <style:style style:name="T7" style:family="text">
      <style:text-properties officeooo:rsid="00ca6957"/>
    </style:style>
    <style:style style:name="T8" style:family="text">
      <style:text-properties officeooo:rsid="0024ce09"/>
    </style:style>
    <style:style style:name="T9" style:family="text">
      <style:text-properties fo:color="#127622" loext:opacity="100%" officeooo:rsid="0024ce09"/>
    </style:style>
    <style:style style:name="T10" style:family="text">
      <style:text-properties fo:color="#127622" loext:opacity="100%" officeooo:rsid="002aa414"/>
    </style:style>
    <style:style style:name="T11" style:family="text">
      <style:text-properties officeooo:rsid="00e10d63"/>
    </style:style>
    <style:style style:name="T12" style:family="text">
      <style:text-properties officeooo:rsid="00709c8b"/>
    </style:style>
    <style:style style:name="T13" style:family="text">
      <style:text-properties fo:color="#127622" loext:opacity="100%"/>
    </style:style>
    <style:style style:name="T14" style:family="text">
      <style:text-properties fo:color="#127622" loext:opacity="100%" officeooo:rsid="001608d8"/>
    </style:style>
    <style:style style:name="T15" style:family="text">
      <style:text-properties style:text-position="33% 80%"/>
    </style:style>
    <style:style style:name="T16" style:family="text">
      <style:text-properties fo:color="#ff0000" loext:opacity="100%"/>
    </style:style>
    <style:style style:name="T17" style:family="text">
      <style:text-properties fo:color="#ff0000" loext:opacity="100%" fo:background-color="#fff5ce" loext:char-shading-value="0"/>
    </style:style>
    <style:style style:name="T18" style:family="text">
      <style:text-properties style:font-name="Liberation Sans" fo:font-size="12pt" officeooo:rsid="0016fe3f" style:font-size-asian="12pt" style:font-size-complex="12pt"/>
    </style:style>
    <style:style style:name="T19" style:family="text">
      <style:text-properties style:font-name="Liberation Sans" fo:font-size="12pt" officeooo:rsid="00714fa7" style:font-size-asian="12pt" style:font-size-complex="12pt"/>
    </style:style>
    <style:style style:name="T20" style:family="text">
      <style:text-properties style:font-name="Liberation Sans" fo:font-size="12pt" officeooo:rsid="009807a6" style:font-size-asian="12pt" style:font-size-complex="12pt"/>
    </style:style>
    <style:style style:name="T21" style:family="text">
      <style:text-properties fo:color="#127622" loext:opacity="100%" style:font-name="Liberation Sans" fo:font-size="12pt" officeooo:rsid="0016fe3f" style:font-size-asian="12pt" style:font-size-complex="12pt"/>
    </style:style>
    <style:style style:name="T22" style:family="text">
      <style:text-properties fo:font-size="12pt" style:font-size-asian="12pt" style:font-size-complex="12pt"/>
    </style:style>
    <style:style style:name="T23" style:family="text">
      <style:text-properties officeooo:rsid="009a122c"/>
    </style:style>
    <style:style style:name="T24" style:family="text">
      <style:text-properties officeooo:rsid="002702b4"/>
    </style:style>
    <style:style style:name="T25" style:family="text">
      <style:text-properties officeooo:rsid="0026bb9a"/>
    </style:style>
    <style:style style:name="T26" style:family="text">
      <style:text-properties fo:color="#127622" loext:opacity="100%" officeooo:rsid="0026bb9a"/>
    </style:style>
    <style:style style:name="T27" style:family="text">
      <style:text-properties officeooo:rsid="00cab35b"/>
    </style:style>
    <style:style style:name="T28" style:family="text">
      <style:text-properties officeooo:rsid="00ca7e17"/>
    </style:style>
    <style:style style:name="T29" style:family="text">
      <style:text-properties officeooo:rsid="0073a894"/>
    </style:style>
    <style:style style:name="T30" style:family="text">
      <style:text-properties officeooo:rsid="002873f1"/>
    </style:style>
    <style:style style:name="T31" style:family="text">
      <style:text-properties fo:color="#127622" loext:opacity="100%" officeooo:rsid="002873f1"/>
    </style:style>
    <style:style style:name="T32" style:family="text">
      <style:text-properties fo:color="#127622" loext:opacity="100%" officeooo:rsid="0073a894"/>
    </style:style>
    <style:style style:name="T33" style:family="text">
      <style:text-properties officeooo:rsid="001fa0ef"/>
    </style:style>
    <style:style style:name="T34" style:family="text">
      <style:text-properties officeooo:rsid="00212958"/>
    </style:style>
    <style:style style:name="T35" style:family="text">
      <style:text-properties fo:color="#127622" loext:opacity="100%" officeooo:rsid="0021ce82"/>
    </style:style>
    <style:style style:name="T36" style:family="text">
      <style:text-properties officeooo:rsid="002ae058"/>
    </style:style>
    <style:style style:name="T37" style:family="text">
      <style:text-properties officeooo:rsid="0022ea31"/>
    </style:style>
    <style:style style:name="T38" style:family="text">
      <style:text-properties officeooo:rsid="00784906"/>
    </style:style>
    <style:style style:name="T39" style:family="text">
      <style:text-properties fo:background-color="#fff5ce" loext:char-shading-value="0"/>
    </style:style>
    <style:style style:name="T40" style:family="text">
      <style:text-properties fo:color="#127622" loext:opacity="100%" officeooo:rsid="00753a01"/>
    </style:style>
    <style:style style:name="T41" style:family="text">
      <style:text-properties officeooo:rsid="002ffb39"/>
    </style:style>
    <style:style style:name="T42" style:family="text">
      <style:text-properties officeooo:rsid="0019205d"/>
    </style:style>
    <style:style style:name="T43" style:family="text">
      <style:text-properties officeooo:rsid="001b0614"/>
    </style:style>
    <style:style style:name="T44" style:family="text">
      <style:text-properties fo:color="#127622" loext:opacity="100%" officeooo:rsid="001c8d0a"/>
    </style:style>
    <style:style style:name="T45" style:family="text">
      <style:text-properties officeooo:rsid="001c8d0a"/>
    </style:style>
    <style:style style:name="T46" style:family="text">
      <style:text-properties fo:color="#127622" loext:opacity="100%" officeooo:rsid="001b0614"/>
    </style:style>
    <style:style style:name="T47" style:family="text">
      <style:text-properties officeooo:rsid="009ea085"/>
    </style:style>
    <style:style style:name="T48" style:family="text">
      <style:text-properties officeooo:rsid="009e0759"/>
    </style:style>
    <style:style style:name="T49" style:family="text">
      <style:text-properties officeooo:rsid="00a0276a"/>
    </style:style>
    <style:style style:name="T50" style:family="text">
      <style:text-properties officeooo:rsid="00a1f313"/>
    </style:style>
    <style:style style:name="T51" style:family="text">
      <style:text-properties officeooo:rsid="0074263d"/>
    </style:style>
    <style:style style:name="T52" style:family="text">
      <style:text-properties officeooo:rsid="00a29fce"/>
    </style:style>
    <style:style style:name="T53" style:family="text">
      <style:text-properties officeooo:rsid="002e5c1e"/>
    </style:style>
    <style:style style:name="T54" style:family="text">
      <style:text-properties officeooo:rsid="007423ee"/>
    </style:style>
    <style:style style:name="T55" style:family="text">
      <style:text-properties officeooo:rsid="00789c67"/>
    </style:style>
    <style:style style:name="T56" style:family="text">
      <style:text-properties officeooo:rsid="00a5d4f6"/>
    </style:style>
    <style:style style:name="T57" style:family="text">
      <style:text-properties officeooo:rsid="00cb66cd"/>
    </style:style>
    <style:style style:name="T58" style:family="text">
      <style:text-properties officeooo:rsid="007aed1c"/>
    </style:style>
    <style:style style:name="T59" style:family="text">
      <style:text-properties officeooo:rsid="009afd58"/>
    </style:style>
    <style:style style:name="T60" style:family="text">
      <style:text-properties officeooo:rsid="00ae5de6"/>
    </style:style>
    <style:style style:name="T61" style:family="text">
      <style:text-properties style:use-window-font-color="true" loext:opacity="0%"/>
    </style:style>
    <style:style style:name="T62" style:family="text">
      <style:text-properties officeooo:rsid="0044725c"/>
    </style:style>
    <style:style style:name="T63" style:family="text">
      <style:text-properties officeooo:rsid="00458f35"/>
    </style:style>
    <style:style style:name="T64" style:family="text">
      <style:text-properties officeooo:rsid="00831f59"/>
    </style:style>
    <style:style style:name="T65" style:family="text">
      <style:text-properties officeooo:rsid="00cc6845"/>
    </style:style>
    <style:style style:name="T66" style:family="text">
      <style:text-properties officeooo:rsid="0048380a"/>
    </style:style>
    <style:style style:name="T67" style:family="text">
      <style:text-properties officeooo:rsid="004940da"/>
    </style:style>
    <style:style style:name="T68" style:family="text">
      <style:text-properties officeooo:rsid="00af1c1c"/>
    </style:style>
    <style:style style:name="T69" style:family="text">
      <style:text-properties officeooo:rsid="00b15901"/>
    </style:style>
    <style:style style:name="T70" style:family="text">
      <style:text-properties officeooo:rsid="004785cd"/>
    </style:style>
    <style:style style:name="T71" style:family="text">
      <style:text-properties fo:background-color="#ffffd7" loext:char-shading-value="0"/>
    </style:style>
    <style:style style:name="T72" style:family="text">
      <style:text-properties fo:background-color="#ffdbb6" loext:char-shading-value="0"/>
    </style:style>
    <style:style style:name="T73" style:family="text">
      <style:text-properties officeooo:rsid="004ad082"/>
    </style:style>
    <style:style style:name="T74" style:family="text">
      <style:text-properties officeooo:rsid="004e4978"/>
    </style:style>
    <style:style style:name="T75" style:family="text">
      <style:text-properties officeooo:rsid="00b39395"/>
    </style:style>
    <style:style style:name="T76" style:family="text">
      <style:text-properties officeooo:rsid="00501d9d"/>
    </style:style>
    <style:style style:name="T77" style:family="text">
      <style:text-properties officeooo:rsid="00b4359b"/>
    </style:style>
    <style:style style:name="T78" style:family="text">
      <style:text-properties officeooo:rsid="00838dcd"/>
    </style:style>
    <style:style style:name="T79" style:family="text">
      <style:text-properties officeooo:rsid="0083c7fe"/>
    </style:style>
    <style:style style:name="T80" style:family="text">
      <style:text-properties officeooo:rsid="00b57d09"/>
    </style:style>
    <style:style style:name="T81" style:family="text">
      <style:text-properties officeooo:rsid="00cdaf5a"/>
    </style:style>
    <style:style style:name="T82" style:family="text">
      <style:text-properties fo:color="#127622" loext:opacity="100%" officeooo:rsid="0041ae34"/>
    </style:style>
    <style:style style:name="T83" style:family="text">
      <style:text-properties officeooo:rsid="0041ae34"/>
    </style:style>
    <style:style style:name="T84" style:family="text">
      <style:text-properties officeooo:rsid="0042463f"/>
    </style:style>
    <style:style style:name="T85" style:family="text">
      <style:text-properties officeooo:rsid="00856985"/>
    </style:style>
    <style:style style:name="T86" style:family="text">
      <style:text-properties style:font-name="Liberation Sans" fo:font-size="12pt" officeooo:rsid="005b72a5" style:font-size-asian="12pt" style:font-size-complex="12pt"/>
    </style:style>
    <style:style style:name="T87" style:family="text">
      <style:text-properties style:font-name="Liberation Sans" fo:font-size="12pt" officeooo:rsid="0044725c" style:font-size-asian="12pt" style:font-size-complex="12pt"/>
    </style:style>
    <style:style style:name="T88" style:family="text">
      <style:text-properties style:font-name="Liberation Sans" fo:font-size="12pt" officeooo:rsid="00b69a9f" style:font-size-asian="12pt" style:font-size-complex="12pt"/>
    </style:style>
    <style:style style:name="T89" style:family="text">
      <style:text-properties style:font-name="Liberation Sans" fo:font-size="12pt" officeooo:rsid="00596e6d" style:font-size-asian="12pt" style:font-size-complex="12pt"/>
    </style:style>
    <style:style style:name="T90" style:family="text">
      <style:text-properties fo:color="#127622" loext:opacity="100%" style:font-name="Liberation Sans" fo:font-size="12pt" officeooo:rsid="0044725c" style:font-size-asian="12pt" style:font-size-complex="12pt"/>
    </style:style>
    <style:style style:name="T91" style:family="text">
      <style:text-properties fo:color="#127622" loext:opacity="100%" style:font-name="Liberation Sans" fo:font-size="12pt" officeooo:rsid="00b72c7a" style:font-size-asian="12pt" style:font-size-complex="12pt"/>
    </style:style>
    <style:style style:name="T92" style:family="text">
      <style:text-properties fo:color="#127622" loext:opacity="100%" officeooo:rsid="0059ea7b"/>
    </style:style>
    <style:style style:name="T93" style:family="text">
      <style:text-properties style:text-position="33% 80%" officeooo:rsid="0059ea7b"/>
    </style:style>
    <style:style style:name="T94" style:family="text">
      <style:text-properties officeooo:rsid="008fda8b"/>
    </style:style>
    <style:style style:name="T95" style:family="text">
      <style:text-properties officeooo:rsid="00ce64c4"/>
    </style:style>
    <style:style style:name="T96" style:family="text">
      <style:text-properties officeooo:rsid="00bbbf21"/>
    </style:style>
    <style:style style:name="T97" style:family="text">
      <style:text-properties officeooo:rsid="00cf257e"/>
    </style:style>
    <style:style style:name="T98" style:family="text">
      <style:text-properties officeooo:rsid="008a8dbd"/>
    </style:style>
    <style:style style:name="T99" style:family="text">
      <style:text-properties officeooo:rsid="0091e974"/>
    </style:style>
    <style:style style:name="T100" style:family="text">
      <style:text-properties fo:background-color="#ffff00" loext:char-shading-value="0"/>
    </style:style>
    <style:style style:name="T101" style:family="text">
      <style:text-properties fo:background-color="#ffffa6" loext:char-shading-value="0"/>
    </style:style>
    <style:style style:name="T102" style:family="text">
      <style:text-properties fo:background-color="#dee6ef" loext:char-shading-value="0"/>
    </style:style>
    <style:style style:name="T103" style:family="text">
      <style:text-properties fo:background-color="#ffe994" loext:char-shading-value="0"/>
    </style:style>
    <style:style style:name="T104" style:family="text">
      <style:text-properties officeooo:rsid="00c12ad0"/>
    </style:style>
    <style:style style:name="T105" style:family="text">
      <style:text-properties officeooo:rsid="006952ff"/>
    </style:style>
    <style:style style:name="T106" style:family="text">
      <style:text-properties style:font-name="Liberation Sans" fo:font-size="12pt" fo:font-style="normal" officeooo:rsid="00458f35" style:font-size-asian="12pt" style:font-style-asian="normal" style:font-size-complex="12pt" style:font-style-complex="normal"/>
    </style:style>
    <style:style style:name="T107" style:family="text">
      <style:text-properties style:font-name="Liberation Sans" fo:font-size="12pt" fo:font-style="italic" officeooo:rsid="00458f35" style:font-size-asian="12pt" style:font-style-asian="italic" style:font-size-complex="12pt" style:font-style-complex="italic"/>
    </style:style>
    <style:style style:name="T108" style:family="text">
      <style:text-properties style:font-name="Liberation Sans" fo:font-size="12pt" officeooo:rsid="00458f35" style:font-size-asian="12pt" style:font-size-complex="12pt"/>
    </style:style>
    <style:style style:name="T109" style:family="text">
      <style:text-properties style:font-name="Liberation Sans" fo:font-size="12pt" officeooo:rsid="00663cd8" style:font-size-asian="12pt" style:font-size-complex="12pt"/>
    </style:style>
    <style:style style:name="T110" style:family="text">
      <style:text-properties officeooo:rsid="006b18f6"/>
    </style:style>
    <style:style style:name="T111" style:family="text">
      <style:text-properties fo:color="#127622" loext:opacity="100%" officeooo:rsid="006b18f6"/>
    </style:style>
    <style:style style:name="T112" style:family="text">
      <style:text-properties officeooo:rsid="0070456b"/>
    </style:style>
    <style:style style:name="T113" style:family="text">
      <style:text-properties officeooo:rsid="006c5553"/>
    </style:style>
    <style:style style:name="T114" style:family="text">
      <style:text-properties officeooo:rsid="006f3f72"/>
    </style:style>
    <style:style style:name="T115" style:family="text">
      <style:text-properties officeooo:rsid="006d71d4"/>
    </style:style>
    <style:style style:name="T116" style:family="text">
      <style:text-properties officeooo:rsid="00704e8b"/>
    </style:style>
    <style:style style:name="T117" style:family="text">
      <style:text-properties fo:color="#127622" loext:opacity="100%" officeooo:rsid="00704e8b"/>
    </style:style>
    <style:style style:name="T118" style:family="text">
      <style:text-properties fo:color="#127622" loext:opacity="100%" style:font-name="Liberation Sans" fo:font-size="12pt" fo:font-style="normal" officeooo:rsid="0067e2c8" style:font-size-asian="12pt" style:font-style-asian="normal" style:font-size-complex="12pt" style:font-style-complex="normal"/>
    </style:style>
    <style:style style:name="T119" style:family="text">
      <style:text-properties style:font-name="Liberation Sans" fo:font-size="12pt" fo:font-style="normal" officeooo:rsid="0067e2c8" style:font-size-asian="12pt" style:font-style-asian="normal" style:font-size-complex="12pt" style:font-style-complex="normal"/>
    </style:style>
    <style:style style:name="T120" style:family="text">
      <style:text-properties officeooo:rsid="00c51a11"/>
    </style:style>
    <style:style style:name="T121" style:family="text">
      <style:text-properties officeooo:rsid="007051a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ultivating</text:span> <text:span text:style-name="T2">the fields of God</text:span></text:p>
      <text:p text:style-name="P2">A <text:span text:style-name="T3">fundamental</text:span> field guide for <text:span text:style-name="T1">God’s</text:span> <text:span text:style-name="T4">labourers</text:span></text:p>
      <text:p text:style-name="P3"/>
      <text:p text:style-name="P4">Labouring in God’s fields is <text:span text:style-name="T5">not</text:span> a specific calling amongst reborn human<text:span text:style-name="T6">s</text:span>. It <text:span text:style-name="T6">is a general duty that </text:span>applies to all <text:span text:style-name="T7">those saved from the wrath to come</text:span> <text:span text:style-name="T8">(</text:span><text:span text:style-name="T9">Ecc</text:span><text:span text:style-name="T10">lesiastes</text:span><text:span text:style-name="T9"> 12:13,14</text:span><text:span text:style-name="T8">)</text:span>. <text:span text:style-name="T6">To learn</text:span> more <text:span text:style-name="T6">about</text:span> <text:span text:style-name="T11">spiritual</text:span> gifts that are <text:span text:style-name="T6">given to each of us as needed </text:span><text:span text:style-name="T12">and why</text:span><text:span text:style-name="T6">,</text:span> study <text:span text:style-name="T13">Ephesians 4:11,12</text:span> and <text:span text:style-name="T14">1 Corinthians 12:4-11</text:span><text:span text:style-name="T6">.</text:span></text:p>
      <text:p text:style-name="P3"/>
      <table:table table:name="Table1" table:style-name="Table1">
        <table:table-column table:style-name="Table1.A"/>
        <table:table-row>
          <table:table-cell table:style-name="Table1.A1" office:value-type="string">
            <text:p text:style-name="P5"><text:span text:style-name="T13">Luke 9:61-62</text:span><text:line-break/><text:span text:style-name="T15">61</text:span> And another also said, Lord, I will follow thee; but let me first go bid them farewell, which are at home at my house. <text:span text:style-name="T15">62</text:span> And Jesus said unto him, <text:span text:style-name="T16">No man, </text:span><text:span text:style-name="T17">having put his hand to the plough</text:span><text:span text:style-name="T16">, and looking back, is fit for the kingdom of God.</text:span></text:p>
          </table:table-cell>
        </table:table-row>
      </table:table>
      <text:list text:style-name="L1">
        <text:list-item>
          <text:p text:style-name="P6"><text:span text:style-name="T18">The old man is dead, don’t bother looking back. Rather, look forward, </text:span><text:span text:style-name="T19">running with patience the race that is set before you </text:span><text:span text:style-name="T20">(</text:span><text:span text:style-name="T21">Romans 6:7,11,17,18</text:span>, <text:span text:style-name="T21">2 Corinthians 5:17</text:span>)<text:span text:style-name="T22">.</text:span></text:p>
          <text:list>
            <text:list-item>
              <text:p text:style-name="P7">The wicked will relentlessly bombard you with your past. Remind <text:span text:style-name="T23">them</text:span> of the truth:</text:p>
              <text:list>
                <text:list-item>
                  <text:p text:style-name="P7">That man is dead and a dead man is freed from sin.</text:p>
                </text:list-item>
                <text:list-item>
                  <text:p text:style-name="P7">You are no longer a servant to sin.</text:p>
                </text:list-item>
                <text:list-item>
                  <text:p text:style-name="P8">The blood of Jesus Christ <text:span text:style-name="T24">which cleanseth us from all unrighteousness</text:span> is still on the altar <text:span text:style-name="T25">(</text:span><text:span text:style-name="T26">Hebrews 10:10</text:span><text:span text:style-name="T25">).</text:span></text:p>
                </text:list-item>
              </text:list>
            </text:list-item>
          </text:list>
        </text:list-item>
        <text:list-item>
          <text:p text:style-name="P7">Jesus refers to a saved individual here as a person that operates a “plough”. Other names for <text:span text:style-name="T27">a person</text:span> that operate<text:span text:style-name="T27">s</text:span> <text:span text:style-name="T28">a </text:span>plough/<text:span text:style-name="T29">plow</text:span> are: sower, farmer, husbandman <text:span text:style-name="T30">(</text:span><text:span text:style-name="T31">Gen</text:span><text:span text:style-name="T32">esis</text:span><text:span text:style-name="T31"> 9:20</text:span><text:span text:style-name="T30">)</text:span>.</text:p>
        </text:list-item>
      </text:list>
      <text:p text:style-name="P3"/>
      <text:p text:style-name="P9"/>
      <table:table table:name="Table4" table:style-name="Table4">
        <table:table-column table:style-name="Table4.A"/>
        <table:table-row>
          <table:table-cell table:style-name="Table4.A1" office:value-type="string">
            <text:p text:style-name="P10"><text:span text:style-name="T13">John 4:35</text:span><text:line-break/><text:span text:style-name="T16">Say not ye, </text:span><text:span text:style-name="T17">There are yet four months, and then cometh harvest?</text:span><text:span text:style-name="T16"> behold, I say unto you, Lift up your eyes, and </text:span><text:span text:style-name="T17">look on the fields; for they are white already to harvest.</text:span></text:p>
          </table:table-cell>
        </table:table-row>
      </table:table>
      <text:list text:style-name="L2">
        <text:list-item>
          <text:p text:style-name="P11">Four months before the “<text:span text:style-name="T33">white harvest” (wheat) places this conversation in winter (December/January).</text:span></text:p>
          <text:list>
            <text:list-item>
              <text:p text:style-name="P12">Side note: This is the most likely reason that the Samaritan woman was at the well at noon (also known as the heat of the day <text:span text:style-name="T34">and</text:span> the sixth hour, <text:span text:style-name="T35">John 11:9</text:span>) instead of the cool of the day (morning or evening). <text:span text:style-name="T36">The temperature range for that region in winter is 45-60F during the day.</text:span></text:p>
            </text:list-item>
          </text:list>
        </text:list-item>
        <text:list-item>
          <text:p text:style-name="P13">But, Jesus said the fields are ready to harvest now. <text:span text:style-name="T37">The wheat would not be ready for another four months so what fields were ready to harvest?</text:span></text:p>
        </text:list-item>
        <text:list-item>
          <text:p text:style-name="P13">He was talking about the fields of God’s husbandry <text:span text:style-name="T38">which are people.</text:span></text:p>
        </text:list-item>
      </text:list>
      <text:p text:style-name="P14"/>
      <text:p text:style-name="P14"/>
      <table:table table:name="Table3" table:style-name="Table3">
        <table:table-column table:style-name="Table3.A"/>
        <table:table-row>
          <table:table-cell table:style-name="Table3.A1" office:value-type="string">
            <text:p text:style-name="P15"><text:span text:style-name="T13">John 15:1</text:span><text:line-break/><text:span text:style-name="T15">1</text:span> <text:span text:style-name="T16">I am the true vine, and </text:span><text:span text:style-name="T17">my Father is the husbandman</text:span><text:span text:style-name="T16">.</text:span></text:p>
          </table:table-cell>
        </table:table-row>
        <table:table-row>
          <table:table-cell table:style-name="Table3.A2" office:value-type="string">
            <text:p text:style-name="P5"><text:span text:style-name="T13">1 Corinthians 3:6-11</text:span><text:line-break/><text:span text:style-name="T15">6</text:span> <text:span text:style-name="T39">I have planted, Apollos watered; but God gave the increase.</text:span><text:span text:style-name="T15">7</text:span> So then neither is he that planteth any thing, neither he that watereth; but God that giveth the increase.<text:span text:style-name="T15">8</text:span> Now he that planteth and he that watereth are one: and every man shall receive his own reward according to his own labour.<text:span text:style-name="T15">9</text:span> <text:span text:style-name="T39">For we are labourers together with God</text:span>: <text:span text:style-name="T39">ye are God's husbandry</text:span>, ye are God's building.<text:span text:style-name="T15">10</text:span> According to the grace of God which is given unto me, as a wise masterbuilder, I have laid the foundation, and another buildeth thereon. But let every man take heed how he buildeth thereupon.<text:span text:style-name="T15">11</text:span> For other foundation can no man lay than that is laid, which is Jesus Christ.</text:p>
          </table:table-cell>
        </table:table-row>
        <table:table-row>
          <table:table-cell table:style-name="Table3.A2" office:value-type="string">
            <text:p text:style-name="P16"><text:span text:style-name="T13">John 4:3</text:span><text:span text:style-name="T40">6</text:span><text:span text:style-name="T13">-37</text:span></text:p>
            <text:p text:style-name="P17"><text:span text:style-name="T15">36</text:span> <text:span text:style-name="T16">And he that reapeth receiveth wages, and gathereth fruit unto life eternal: that both he that </text:span><text:span text:style-name="T17">soweth</text:span><text:span text:style-name="T16"> and he that </text:span><text:span text:style-name="T17">reapeth</text:span><text:span text:style-name="T16"> may rejoice together.</text:span><text:span text:style-name="T15">37</text:span> <text:span text:style-name="T16">And herein is that saying true, One soweth, and another reapeth.</text:span></text:p>
          </table:table-cell>
        </table:table-row>
      </table:table>
      <text:list text:style-name="L3">
        <text:list-item>
          <text:p text:style-name="P18">We are <text:span text:style-name="T41">labourers (</text:span>husbandman<text:span text:style-name="T41">)</text:span> with God.</text:p>
        </text:list-item>
        <text:list-item>
          <text:p text:style-name="P19"><text:span text:style-name="T42">We are also His field, </text:span><text:span text:style-name="T43">building, and temple (</text:span><text:span text:style-name="T44">Ephesians 2:10a</text:span><text:span text:style-name="T45">, </text:span><text:span text:style-name="T46">1 Corinthians 3:16</text:span><text:span text:style-name="T43">).</text:span></text:p>
        </text:list-item>
        <text:list-item>
          <text:p text:style-name="P20">Just like the seeds we plant, <text:span text:style-name="T47">fertilize, and </text:span><text:span text:style-name="T48">water </text:span>in our garden so too is the word of God and the people we share it with. <text:span text:style-name="T49">How they grow is </text:span><text:span text:style-name="T50">of the Lord of the harvest.</text:span></text:p>
        </text:list-item>
        <text:list-item>
          <text:p text:style-name="P19">There are at least <text:span text:style-name="T51">three</text:span> jobs <text:span text:style-name="T52">for labourers </text:span>in the fields of God:</text:p>
          <text:list>
            <text:list-item>
              <text:p text:style-name="P21"><text:span text:style-name="T53">Plowing</text:span> and Planting <text:span text:style-name="T54">(sowing)</text:span></text:p>
              <text:list>
                <text:list-item>
                  <text:p text:style-name="P22">Seeds <text:span text:style-name="T55">(the word of God)</text:span></text:p>
                </text:list-item>
              </text:list>
            </text:list-item>
            <text:list-item>
              <text:p text:style-name="P21">Watering</text:p>
              <text:list>
                <text:list-item>
                  <text:p text:style-name="P22"><text:span text:style-name="T56">Every plant needs a regular supply of water </text:span><text:span text:style-name="T57">throughout it’s entire life</text:span></text:p>
                </text:list-item>
              </text:list>
            </text:list-item>
            <text:list-item>
              <text:p text:style-name="P23">Reaping</text:p>
              <text:list>
                <text:list-item>
                  <text:p text:style-name="P23"><text:span text:style-name="T58">Fruit produced</text:span> from plants within the fields that others benefit from</text:p>
                </text:list-item>
              </text:list>
            </text:list-item>
          </text:list>
        </text:list-item>
      </text:list>
      <text:p text:style-name="P24"/>
      <text:p text:style-name="P24"/>
      <text:p text:style-name="P25">Jesus gives<text:span text:style-name="T59"> us</text:span> a practical example of a spiritual truth: <text:span text:style-name="T60">going to the market and buying food.</text:span></text:p>
      <table:table table:name="Table11" table:style-name="Table11">
        <table:table-column table:style-name="Table11.A"/>
        <table:table-row>
          <table:table-cell table:style-name="Table11.A1" office:value-type="string">
            <text:p text:style-name="P26"><text:span text:style-name="T13">John 4:38</text:span><text:line-break/><text:span text:style-name="T16">I sent you to reap that whereon ye bestowed no labour: other men laboured, and ye are entered into their labours.</text:span></text:p>
          </table:table-cell>
        </table:table-row>
      </table:table>
      <text:p text:style-name="P27"><text:soft-page-break/>The parable of the Sower</text:p>
      <text:p text:style-name="Text_20_body"/>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text:span text:style-name="T13">Matthew 13:3-8</text:span><text:line-break/><text:span text:style-name="T15">3</text:span> And he spake many things unto them in parables, saying, <text:span text:style-name="T16">Behold, a sower went forth to sow;</text:span></text:p>
            <text:p text:style-name="P28"><text:span text:style-name="T15">4</text:span> <text:span text:style-name="T16">And when he sowed, some seeds fell by the way side, and the fowls came and devoured them up:</text:span></text:p>
            <text:p text:style-name="P28"><text:span text:style-name="T15">5</text:span> <text:span text:style-name="T16">Some fell upon stony places, where they had not much earth: and forthwith they sprung up, because they had no deepness of earth:</text:span></text:p>
            <text:p text:style-name="P28"><text:span text:style-name="T15">6</text:span> <text:span text:style-name="T16">And when the sun was up, they were scorched; and because they had no root, they withered away.</text:span></text:p>
            <text:p text:style-name="P28"><text:span text:style-name="T15">7</text:span> <text:span text:style-name="T16">And some fell among thorns; and the thorns sprung up, and choked them:</text:span></text:p>
            <text:p text:style-name="P28"><text:span text:style-name="T15">8</text:span> <text:span text:style-name="T16">But other fell into good ground, and brought forth fruit, some an hundredfold, some sixtyfold, some thirtyfold.</text:span></text:p>
          </table:table-cell>
          <table:table-cell table:style-name="Table2.A1" office:value-type="string">
            <text:p text:style-name="P29"><text:span text:style-name="T13">Mark 4:3-8</text:span><text:line-break/><text:span text:style-name="T15">3</text:span> <text:span text:style-name="T16">Hearken; Behold, there went out a sower to sow:</text:span></text:p>
            <text:p text:style-name="P29"><text:span text:style-name="T15">4</text:span> <text:span text:style-name="T16">And it came to pass, as he sowed, some fell by the way side, and the fowls of the air came and devoured it up.</text:span></text:p>
            <text:p text:style-name="P30"><text:span text:style-name="T15">5</text:span> <text:span text:style-name="T16">And some fell on stony ground, where it had not much earth; and immediately it sprang up, because it had no depth of earth:</text:span></text:p>
            <text:p text:style-name="P30"><text:span text:style-name="T15">6</text:span> <text:span text:style-name="T16">But when the sun was up, it was scorched; and because it had no root, it withered away.</text:span></text:p>
            <text:p text:style-name="P30"><text:span text:style-name="T15">7</text:span> <text:span text:style-name="T16">And some fell among thorns, and the thorns grew up, and choked it, and it yielded no fruit.</text:span></text:p>
            <text:p text:style-name="P30"><text:span text:style-name="T15">8</text:span> <text:span text:style-name="T16">And other fell on good ground, and did yield fruit that sprang up and increased; and brought forth, some thirty, and some sixty, and some an hundred.</text:span></text:p>
          </table:table-cell>
          <table:table-cell table:style-name="Table2.C1" office:value-type="string">
            <text:p text:style-name="P30"><text:span text:style-name="T13">Luke 8:5-8</text:span><text:line-break/><text:span text:style-name="T15">5</text:span> <text:span text:style-name="T16">A sower went out to sow his seed: and as he sowed, some fell by the way side; and it was trodden down, and the fowls of the air devoured it.</text:span></text:p>
            <text:p text:style-name="P30"><text:span text:style-name="T15">6</text:span> <text:span text:style-name="T16">And some fell upon a rock; and as soon as it was sprung up, it withered away, because it lacked moisture.</text:span></text:p>
            <text:p text:style-name="P30"><text:span text:style-name="T15">7</text:span> <text:span text:style-name="T16">And some fell among thorns; and the thorns sprang up with it, and choked it.</text:span></text:p>
            <text:p text:style-name="P30"><text:span text:style-name="T15">8</text:span> <text:span text:style-name="T16">And other fell on good ground, and sprang up, and bare fruit an hundredfold. </text:span><text:span text:style-name="T61">And when he had said these things, he cried,</text:span><text:span text:style-name="T16"> He that hath ears to hear, let him hear.</text:span></text:p>
          </table:table-cell>
        </table:table-row>
        <table:table-row>
          <table:table-cell table:style-name="Table2.A2" office:value-type="string">
            <text:p text:style-name="P31"><text:span text:style-name="T13">Matthew 13:18-23</text:span><text:line-break/><text:span text:style-name="T15">18</text:span> <text:span text:style-name="T16">Hear ye therefore the parable of the sower.</text:span></text:p>
            <text:p text:style-name="P31"><text:span text:style-name="T15">19</text:span> <text:span text:style-name="T16">When any one </text:span><text:span text:style-name="T17">heareth the word</text:span><text:span text:style-name="T16"> of the kingdom, and understandeth it not, then cometh the wicked one, and catcheth away that which was sown in his heart. This is he which received seed by the way side.</text:span></text:p>
            <text:p text:style-name="P31"><text:span text:style-name="T15">20</text:span> <text:span text:style-name="T16">But he that received the seed into stony places, the same is he that heareth the word, and anon with joy receiveth it;</text:span></text:p>
            <text:p text:style-name="P31"><text:span text:style-name="T15">21</text:span> <text:span text:style-name="T16">Yet hath he not root in himself, but dureth for a while: for when tribulation or persecution ariseth because of the word, by and by he is offended.</text:span></text:p>
            <text:p text:style-name="P31"><text:span text:style-name="T15">22</text:span> <text:span text:style-name="T16">He also that received seed among the thorns is he that heareth the word; and the care of this world, and the deceitfulness of riches, choke the word, and he becometh unfruitful.</text:span></text:p>
            <text:p text:style-name="P31"><text:span text:style-name="T15">23</text:span> <text:span text:style-name="T16">But he that received seed into the good ground is he that heareth the word, and understandeth it; which also beareth fruit, and bringeth forth, some an hundredfold, some sixty, some thirty.</text:span></text:p>
          </table:table-cell>
          <table:table-cell table:style-name="Table2.A2" office:value-type="string">
            <text:p text:style-name="P30"><text:span text:style-name="T13">Mark 4:13-20</text:span><text:line-break/><text:span text:style-name="T15">13</text:span> <text:span text:style-name="T61">And he said unto them,</text:span><text:span text:style-name="T16"> Know ye not this parable? and how then will ye know all parables?</text:span> </text:p>
            <text:p text:style-name="P30"><text:span text:style-name="T15">14</text:span> <text:span text:style-name="T17">The sower soweth the word</text:span><text:span text:style-name="T16">.</text:span></text:p>
            <text:p text:style-name="P30"><text:span text:style-name="T15">15</text:span> <text:span text:style-name="T16">And these are they by the way side, where the word is sown; but when they have heard, Satan cometh immediately, and taketh away the word that was sown in their hearts.</text:span></text:p>
            <text:p text:style-name="P30"><text:span text:style-name="T15">16</text:span> <text:span text:style-name="T16">And these are they likewise which are sown on stony ground; who, when they have heard the word, immediately receive it with gladness;</text:span></text:p>
            <text:p text:style-name="P30"><text:span text:style-name="T15">17</text:span> <text:span text:style-name="T16">And have no root in themselves, and so endure but for a time: afterward, when affliction or persecution ariseth for the word's sake, immediately they are offended.</text:span></text:p>
            <text:p text:style-name="P30"><text:span text:style-name="T15">18</text:span> <text:span text:style-name="T16">And these are they which are sown among thorns; such as hear the word,</text:span></text:p>
            <text:p text:style-name="P30"><text:span text:style-name="T15">19</text:span> <text:span text:style-name="T16">And the cares of this world, and the deceitfulness of riches, and the lusts of other things entering in, choke the word, and it becometh unfruitful.</text:span></text:p>
            <text:p text:style-name="P30"><text:span text:style-name="T15">20</text:span> <text:span text:style-name="T16">And these are they which are sown on good ground; such as hear the word, and receive it, and bring forth fruit, some thirtyfold, some sixty, and some an hundred.</text:span></text:p>
          </table:table-cell>
          <table:table-cell table:style-name="Table2.C2" office:value-type="string">
            <text:p text:style-name="P32"><text:span text:style-name="T13">Luke 8:11-15</text:span><text:line-break/><text:span text:style-name="T15">11</text:span> <text:span text:style-name="T16">Now the parable is this: </text:span><text:span text:style-name="T17">The seed is the word of God.</text:span></text:p>
            <text:p text:style-name="P33"><text:span text:style-name="T15">12</text:span> <text:span text:style-name="T16">Those by the way side are they that hear; then cometh the devil, and taketh away the word out of their hearts, lest they should believe and be saved.</text:span></text:p>
            <text:p text:style-name="P33"><text:span text:style-name="T15">13</text:span> <text:span text:style-name="T16">They on the rock are they, which, when they hear, receive the word with joy; and these have no root, which for a while believe, and in time of temptation fall away.</text:span></text:p>
            <text:p text:style-name="P33"><text:span text:style-name="T15">14</text:span> <text:span text:style-name="T16">And that which fell among thorns are they, which, when they have heard, go forth, and are choked with cares and riches and pleasures of this life, and bring no fruit to perfection.</text:span></text:p>
            <text:p text:style-name="P33"><text:span text:style-name="T15">15</text:span> <text:span text:style-name="T16">But that on the good ground are they, which in an honest and good heart, having heard the word, keep it, and bring forth fruit with patience.</text:span></text:p>
          </table:table-cell>
        </table:table-row>
      </table:table>
      <text:list text:style-name="L4">
        <text:list-item>
          <text:p text:style-name="P34">The seed that is to be sowed is the word of God.</text:p>
          <text:list>
            <text:list-item>
              <text:p text:style-name="P35">And it must be spoken so that another can hear it.</text:p>
            </text:list-item>
          </text:list>
        </text:list-item>
        <text:list-item>
          <text:p text:style-name="P34">To speak <text:span text:style-name="T62">the word of God</text:span> we need to know <text:span text:style-name="T63">the word of God.</text:span></text:p>
          <text:list>
            <text:list-item>
              <text:p text:style-name="P36">This requires work but it is not as hard <text:span text:style-name="T64">as the devil may want you to believe n</text:span>or <text:span text:style-name="T64">is it </text:span>as complicated as you might imagine.</text:p>
            </text:list-item>
          </text:list>
        </text:list-item>
        <text:list-item>
          <text:p text:style-name="P37">The parable of the Sower <text:span text:style-name="T65">teaches </text:span>us what types of ground we can expect to encounter when sowing <text:span text:style-name="T65">(and more).</text:span></text:p>
        </text:list-item>
      </text:list>
      <text:p text:style-name="P38"/>
      <text:p text:style-name="P38"/>
      <text:p text:style-name="P38"/>
      <text:p text:style-name="P38"><text:soft-page-break/>The <text:span text:style-name="T66">foundation</text:span> for memorizing God’s written word is nothing more than repetition (<text:span text:style-name="T13">Isaiah 28:9,10</text:span>). <text:span text:style-name="T66">Be not deceived: t</text:span>hat <text:span text:style-name="T66">is all there is to it</text:span>. <text:span text:style-name="T67">We</text:span> can use whatever form of repetition works for <text:span text:style-name="T67">us</text:span> (I would recommend a mix of all of them!). Here are a few <text:span text:style-name="T68">common </text:span>examples <text:span text:style-name="T68">b</text:span>ut always remember that <text:span text:style-name="T69">no matter which method you choose </text:span>the foundation <text:span text:style-name="T70">of successful memorization will always be </text:span>repetition:</text:p>
      <text:list text:continue-numbering="true" text:style-name="L4">
        <text:list-item>
          <text:list>
            <text:list-item>
              <text:list>
                <text:list-item>
                  <text:p text:style-name="P39">Writing it</text:p>
                </text:list-item>
                <text:list-item>
                  <text:p text:style-name="P39">Singing it</text:p>
                </text:list-item>
                <text:list-item>
                  <text:p text:style-name="P39">Reading it</text:p>
                </text:list-item>
                <text:list-item>
                  <text:p text:style-name="P40">Speaking it</text:p>
                </text:list-item>
                <text:list-item>
                  <text:p text:style-name="P40">Trivia</text:p>
                </text:list-item>
              </text:list>
            </text:list-item>
          </text:list>
        </text:list-item>
      </text:list>
      <text:p text:style-name="P38"/>
      <table:table table:name="Table6" table:style-name="Table6">
        <table:table-column table:style-name="Table6.A"/>
        <table:table-row>
          <table:table-cell table:style-name="Table6.A1" office:value-type="string">
            <text:p text:style-name="P41"><text:span text:style-name="T13">Isaiah 28:9,10</text:span><text:line-break/><text:span text:style-name="T15">9</text:span> Whom shall he teach knowledge? and whom shall he make to understand doctrine? them that are weaned from the milk, and drawn from the breasts.</text:p>
            <text:p text:style-name="P41"><text:span text:style-name="T15">10</text:span> For <text:span text:style-name="T39">precept</text:span> <text:span text:style-name="T16">must be</text:span> <text:span text:style-name="T39">upon precept</text:span>, <text:span text:style-name="T39">precept upon precept</text:span>; <text:span text:style-name="T71">line upon line</text:span>, <text:span text:style-name="T71">line upon line</text:span>; <text:span text:style-name="T72">here a little</text:span>, and <text:span text:style-name="T72">there a little</text:span>:</text:p>
          </table:table-cell>
        </table:table-row>
      </table:table>
      <text:list text:style-name="L5">
        <text:list-item>
          <text:p text:style-name="P42">This is <text:span text:style-name="T73">the key to</text:span> how we memorize anything: good or bad.</text:p>
        </text:list-item>
        <text:list-item>
          <text:p text:style-name="P43">Any <text:span text:style-name="T74">other </text:span><text:span text:style-name="T75">temptation</text:span><text:span text:style-name="T74"> </text:span><text:span text:style-name="T76">not based on this God’s word is</text:span> deception.</text:p>
        </text:list-item>
      </text:list>
      <text:p text:style-name="P44"/>
      <text:p text:style-name="P44"/>
      <text:p text:style-name="P45"><text:span text:style-name="T16">WARNING</text:span>!</text:p>
      <text:p text:style-name="P46"><text:span text:style-name="T5">Do not</text:span> let the wicked get you down because you don’t have <text:span text:style-name="T62">all of God’s written word memorized!</text:span> <text:span text:style-name="T5">Do not</text:span> let <text:span text:style-name="T77">them</text:span> get you anxious or nervous about it either! <text:span text:style-name="T78">God already </text:span><text:span text:style-name="T79">knew </text:span><text:span text:style-name="T80">that we would have this infirmity </text:span><text:span text:style-name="T79">before </text:span><text:span text:style-name="T81">He created us</text:span><text:span text:style-name="T79"> and H</text:span><text:span text:style-name="T78">e </text:span><text:span text:style-name="T62">is faithful: </text:span><text:span text:style-name="T82">1 Corinthians 10:13</text:span><text:span text:style-name="T83">.</text:span></text:p>
      <text:p text:style-name="P46"/>
      <text:p text:style-name="P47"><text:span text:style-name="T84">First, k</text:span>now that not all of God’s word is written. <text:span text:style-name="T85">Here’s how we can prove that with God’s word:</text:span></text:p>
      <text:p text:style-name="P47"/>
      <table:table table:name="Table7" table:style-name="Table7">
        <table:table-column table:style-name="Table7.A"/>
        <table:table-column table:style-name="Table7.B"/>
        <table:table-row table:style-name="Table7.1">
          <table:table-cell table:style-name="Table7.A1" office:value-type="string">
            <text:p text:style-name="P48"><text:span text:style-name="T13">Matthew 4:4</text:span><text:line-break/>But he answered and said, <text:span text:style-name="T16">It is written, Man shall not live by bread alone, </text:span><text:span text:style-name="T17">but by every word that proceedeth out of the mouth of God</text:span><text:span text:style-name="T16">.</text:span></text:p>
          </table:table-cell>
          <table:table-cell table:style-name="Table7.B1" office:value-type="string">
            <text:p text:style-name="P48"><text:span text:style-name="T13">Luke 4:4</text:span><text:line-break/>And Jesus answered him, saying, <text:span text:style-name="T16">It is written, That man shall not live by bread alone, </text:span><text:span text:style-name="T17">but by every word of God</text:span><text:span text:style-name="T16">.</text:span></text:p>
          </table:table-cell>
        </table:table-row>
        <table:table-row table:style-name="Table7.1">
          <table:table-cell table:style-name="Table7.A2" office:value-type="string">
            <text:p text:style-name="P49">The spoken word of God</text:p>
          </table:table-cell>
          <table:table-cell table:style-name="Table7.B2" office:value-type="string">
            <text:p text:style-name="P49">The written word of God</text:p>
          </table:table-cell>
        </table:table-row>
      </table:table>
      <text:p text:style-name="P47"/>
      <text:p text:style-name="P50"><text:span text:style-name="T86">Ok, so you have your King James Bible which is the written word of God. So, </text:span><text:span text:style-name="T87">how do we receive </text:span><text:span text:style-name="T88">or prove</text:span><text:span text:style-name="T87"> the spoken word of God? </text:span><text:span text:style-name="T89">The Holy Ghost:</text:span><text:span text:style-name="T87"> </text:span><text:span text:style-name="T90">John </text:span><text:span text:style-name="T91">14:26, </text:span><text:span text:style-name="T90">16:13</text:span>.</text:p>
      <text:p text:style-name="P51"/>
      <table:table table:name="Table8" table:style-name="Table8">
        <table:table-column table:style-name="Table8.A"/>
        <table:table-row>
          <table:table-cell table:style-name="Table8.A1" office:value-type="string">
            <text:p text:style-name="P52"><text:span text:style-name="T13">Isaiah 55:10,</text:span><text:span text:style-name="T92">11</text:span><text:line-break/><text:span text:style-name="T15">1</text:span><text:span text:style-name="T93">0</text:span> For as the rain cometh down, and the snow from heaven, and returneth not thither, but watereth the earth, and maketh it bring forth and bud, <text:span text:style-name="T39">that it may give seed to the sower</text:span>, and bread to the eater:<text:line-break/><text:span text:style-name="T15">11</text:span> So shall <text:span text:style-name="T72">my word</text:span> be <text:span text:style-name="T72">that goeth forth out of my mouth</text:span>: it shall not return unto me void, but it shall accomplish that which I please, and it shall prosper in the thing whereto I sent it.</text:p>
          </table:table-cell>
        </table:table-row>
      </table:table>
      <text:list text:style-name="L6">
        <text:list-item>
          <text:p text:style-name="P53">God <text:span text:style-name="T94">gives us </text:span><text:span text:style-name="T95">(the sower) </text:span><text:span text:style-name="T94">seed </text:span><text:span text:style-name="T95">(His spoken word) </text:span><text:span text:style-name="T96">for His fields </text:span><text:span text:style-name="T97">through the Holy Ghost.</text:span></text:p>
        </text:list-item>
      </text:list>
      <text:p text:style-name="P54"/>
      <text:p text:style-name="P55"><text:span text:style-name="T98">But, there’s a lot to the word of God! Not only are there 31,102 verses in the written word but He can speak to us as well. </text:span>So, how do we know which seed goes into which field, when, where, <text:span text:style-name="T99">and how</text:span>? <text:span text:style-name="T99">The same way we get the seed: from the written and spoken word of God.</text:span></text:p>
      <text:p text:style-name="P55"/>
      <table:table table:name="Table9" table:style-name="Table9">
        <table:table-column table:style-name="Table9.A"/>
        <table:table-row>
          <table:table-cell table:style-name="Table9.A1" office:value-type="string">
            <text:p text:style-name="P56"><text:span text:style-name="T13">2 Timothy 3:16-17</text:span><text:line-break/><text:span text:style-name="T15">16</text:span> All scripture is given by inspiration of God, and is profitable for doctrine, for reproof, for correction, for instruction in righteousness: <text:span text:style-name="T15">17</text:span> <text:span text:style-name="T39">That the man of God may be perfect, throughly furnished unto all good works</text:span>.</text:p>
          </table:table-cell>
        </table:table-row>
        <table:table-row>
          <table:table-cell table:style-name="Table9.A2" office:value-type="string">
            <text:p text:style-name="P41"><text:span text:style-name="T13">Isaiah 28:23-29</text:span><text:line-break/><text:span text:style-name="T15">23</text:span> Give ye ear, and hear my voice; hearken, and <text:span text:style-name="T39">hear</text:span> my speech.</text:p>
            <text:p text:style-name="P41"><text:span text:style-name="T15">24</text:span> Doth the plowman plow all day to sow? doth he open and break the clods of his ground?</text:p>
            <text:p text:style-name="P41"><text:span text:style-name="T15">25</text:span> When he hath made plain the face thereof, doth he not cast abroad the <text:span text:style-name="T71">fitches</text:span>, and scatter the <text:span text:style-name="T39">cummin</text:span>,<text:line-break/>and cast in the principal <text:span text:style-name="T72">wheat</text:span> and the appointed <text:span text:style-name="T100">barley</text:span> and the <text:span text:style-name="T101">rie</text:span> <text:span text:style-name="T102">in their place</text:span>?</text:p>
            <text:p text:style-name="P41"><text:span text:style-name="T15">26</text:span> <text:span text:style-name="T103">For his God doth instruct him to discretion, and doth teach him</text:span>.</text:p>
            <text:p text:style-name="P41"><text:span text:style-name="T15">27</text:span> For the fitches are not threshed with a threshing instrument, neither is a cart wheel turned about upon the cummin; but the fitches are beaten out with a staff, and the cummin with a rod.</text:p>
            <text:p text:style-name="P41"><text:span text:style-name="T15">28</text:span> Bread corn is bruised; because he will not ever be threshing it, nor break it with the wheel of his cart,<text:line-break/>nor bruise it with his horsemen.</text:p>
            <text:p text:style-name="P56"><text:span text:style-name="T15">29</text:span> This also cometh forth from the LORD of hosts, which is wonderful in counsel, and excellent in working.</text:p>
          </table:table-cell>
        </table:table-row>
      </table:table>
      <text:list text:style-name="L7">
        <text:list-item>
          <text:p text:style-name="P57">Verse 26 makes it plainly clear how we know and are taught which seeds go where.</text:p>
        </text:list-item>
      </text:list>
      <text:p text:style-name="P58"/>
      <text:p text:style-name="P58"/>
      <text:p text:style-name="P59"><text:soft-page-break/>And as if that wasn’t enough, God <text:span text:style-name="T104">gives</text:span> us exceedingly abundantly <text:span text:style-name="T105">above </text:span>all that we could ask for:</text:p>
      <text:p text:style-name="P59"/>
      <table:table table:name="Table10" table:style-name="Table10">
        <table:table-column table:style-name="Table10.A"/>
        <table:table-row>
          <table:table-cell table:style-name="Table10.A1" office:value-type="string">
            <text:p text:style-name="P48"><text:span text:style-name="T13">1 Peter 4:11</text:span><text:line-break/><text:span text:style-name="T39">If any man speak, let him speak </text:span><text:span text:style-name="T72">as</text:span><text:span text:style-name="T39"> the oracles of God</text:span>; if any man minister, let him do it as of the ability which God giveth: that God in all things may be glorified through Jesus Christ, to whom be praise and dominion for ever and ever. Amen.</text:p>
          </table:table-cell>
        </table:table-row>
      </table:table>
      <text:list text:style-name="L8">
        <text:list-item>
          <text:p text:style-name="P60"><text:span text:style-name="T106">To “</text:span><text:span text:style-name="T107">speak as”</text:span><text:span text:style-name="T108"> </text:span><text:span text:style-name="T109">is the same as to “</text:span><text:span text:style-name="T108">speak </text:span><text:span text:style-name="T107">like”.</text:span></text:p>
        </text:list-item>
        <text:list-item>
          <text:p text:style-name="P61">The oracles of God <text:span text:style-name="T105">is the</text:span> written word of God <text:span text:style-name="T110">(</text:span><text:span text:style-name="T111">Acts 7:38</text:span><text:span text:style-name="T110">, </text:span><text:span text:style-name="T111">Romans 3:2</text:span><text:span text:style-name="T110">).</text:span></text:p>
        </text:list-item>
        <text:list-item>
          <text:p text:style-name="P62">For example: “Murder is evil”. <text:span text:style-name="T112">T</text:span>he word of God does not <text:span text:style-name="T113">say exactly that, </text:span><text:span text:style-name="T112">so then </text:span><text:span text:style-name="T113">we are speaking “like” the word of God bec</text:span><text:span text:style-name="T114">ause</text:span><text:span text:style-name="T113">:</text:span></text:p>
          <text:list>
            <text:list-item>
              <text:p text:style-name="P63"><text:span text:style-name="T115">Not doing well in the eyes of the LORD is</text:span> sin (<text:span text:style-name="T13">Genesis 4:7</text:span>)</text:p>
            </text:list-item>
            <text:list-item>
              <text:p text:style-name="P64">Murder is the same as killing <text:span text:style-name="T116">(</text:span><text:span text:style-name="T117">Matthew 5:21,22</text:span><text:span text:style-name="T116">)</text:span></text:p>
            </text:list-item>
            <text:list-item>
              <text:p text:style-name="P65">We are commanded to not kill (<text:span text:style-name="T118">Exodus 20:13</text:span><text:span text:style-name="T119">, </text:span><text:span text:style-name="T118">Deuteronomy 5:17</text:span>)</text:p>
            </text:list-item>
            <text:list-item>
              <text:p text:style-name="P66">And sin is evil</text:p>
              <text:list>
                <text:list-item>
                  <text:p text:style-name="P66"><text:span text:style-name="T13">Genesis 50:17</text:span> (the <text:span text:style-name="T120">same </text:span>actions of Joseph’s brethren towards him are called two different <text:span text:style-name="T120">words</text:span> <text:span text:style-name="T121">which is a parallelism that also teaches us that sin is evil</text:span>)</text:p>
                </text:list-item>
              </text:list>
            </text:list-item>
          </text:list>
        </text:list-item>
      </text:list>
      <text:p text:style-name="P67"/>
      <text:p text:style-name="P67"/>
      <text:p text:style-name="P68"/>
      <text:p text:style-name="P69">And with all of that we have the fundamentals of labouring in the fields of God.</text:p>
      <text:p text:style-name="P70"/>
      <text:p text:style-name="P70"/>
      <table:table table:name="Table5" table:style-name="Table5">
        <table:table-column table:style-name="Table5.A"/>
        <table:table-column table:style-name="Table5.B"/>
        <table:table-row>
          <table:table-cell table:style-name="Table5.A1" office:value-type="string">
            <text:p text:style-name="P71"><text:span text:style-name="T13">Matthew 9:37-38</text:span><text:line-break/><text:span text:style-name="T15">37</text:span> Then saith he unto his disciples, <text:span text:style-name="T16">The harvest truly is plenteous, but the labourers are few; </text:span><text:span text:style-name="T15">38</text:span> <text:span text:style-name="T16">Pray ye therefore the Lord of the harvest, that he will send forth labourers into his harvest.</text:span></text:p>
          </table:table-cell>
          <table:table-cell table:style-name="Table5.B1" office:value-type="string">
            <text:p text:style-name="P72"><text:span text:style-name="T13">Luke 10:2</text:span><text:line-break/>Therefore said he unto them, <text:span text:style-name="T16">The harvest truly is great, but the labourers are few: pray ye therefore the Lord of the harvest, that he would send forth labourers into his harvest.</text:span></text:p>
          </table:table-cell>
        </table:table-row>
      </table:table>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7T07:09:10.537472900</meta:creation-date>
    <dc:title>Cultivating the fields of God</dc:title>
    <meta:editing-duration>PT6H43M46S</meta:editing-duration>
    <meta:editing-cycles>214</meta:editing-cycles>
    <meta:generator>LibreOffice/26.2.4.2$Linux_X86_64 LibreOffice_project/64a984c51f4702dbd3710b13428c673a2f1292e7</meta:generator>
    <meta:initial-creator>William K. McDannell Jr.</meta:initial-creator>
    <dc:date>2026-07-11T12:30:07.803007871</dc:date>
    <meta:print-date>2025-09-17T14:05:04.337100500</meta:print-date>
    <meta:printed-by>PDF files: William K. McDannell Jr.</meta:printed-by>
    <meta:document-statistic meta:table-count="11" meta:image-count="0" meta:object-count="0" meta:page-count="4" meta:paragraph-count="115" meta:word-count="2616" meta:character-count="13635" meta:non-whitespace-character-count="11175"/>
    <meta:template xlink:type="simple" xlink:actuate="onRequest" xlink:title="default" xlink:href="../../../../AppData/Roaming/LibreOffice/4/user/template/default.ott" meta:date="2025-09-17T07:09:09.613323400"/>
  </office:meta>
</office:document-meta>
</file>