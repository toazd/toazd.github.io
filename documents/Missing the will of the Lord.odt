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2.2292in" style:rel-column-width="18492*"/>
    </style:style>
    <style:style style:name="Table3.B" style:family="table-column">
      <style:table-column-properties style:column-width="5.6708in" style:rel-column-width="47043*"/>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P1" style:family="paragraph" style:parent-style-name="Table_20_Contents">
      <style:text-properties officeooo:rsid="0013e12e" officeooo:paragraph-rsid="001b6d36"/>
    </style:style>
    <style:style style:name="P2" style:family="paragraph" style:parent-style-name="Table_20_Contents">
      <style:text-properties officeooo:rsid="0013e12e" officeooo:paragraph-rsid="0013e12e"/>
    </style:style>
    <style:style style:name="P3" style:family="paragraph" style:parent-style-name="Table_20_Contents">
      <style:text-properties officeooo:paragraph-rsid="0036fa9d"/>
    </style:style>
    <style:style style:name="P4" style:family="paragraph" style:parent-style-name="Table_20_Contents">
      <style:text-properties officeooo:rsid="0036fa9d" officeooo:paragraph-rsid="0036fa9d"/>
    </style:style>
    <style:style style:name="P5" style:family="paragraph" style:parent-style-name="Table_20_Contents">
      <style:text-properties officeooo:rsid="003fc766" officeooo:paragraph-rsid="003fc766"/>
    </style:style>
    <style:style style:name="P6" style:family="paragraph" style:parent-style-name="Table_20_Contents">
      <style:text-properties officeooo:rsid="004b6d68" officeooo:paragraph-rsid="004c3c82"/>
    </style:style>
    <style:style style:name="P7" style:family="paragraph" style:parent-style-name="Table_20_Contents">
      <style:text-properties officeooo:rsid="0013e12e" officeooo:paragraph-rsid="0036fa9d"/>
    </style:style>
    <style:style style:name="P8" style:family="paragraph" style:parent-style-name="Table_20_Contents">
      <style:text-properties officeooo:rsid="00528c90" officeooo:paragraph-rsid="00528c90"/>
    </style:style>
    <style:style style:name="P9" style:family="paragraph" style:parent-style-name="Table_20_Contents">
      <style:text-properties officeooo:rsid="00536d96" officeooo:paragraph-rsid="00536d96"/>
    </style:style>
    <style:style style:name="P10" style:family="paragraph" style:parent-style-name="Table_20_Contents">
      <style:text-properties officeooo:paragraph-rsid="0059e45b"/>
    </style:style>
    <style:style style:name="P11" style:family="paragraph" style:parent-style-name="Table_20_Contents">
      <style:text-properties officeooo:rsid="0013e12e" officeooo:paragraph-rsid="0059e45b"/>
    </style:style>
    <style:style style:name="P12" style:family="paragraph" style:parent-style-name="Table_20_Contents">
      <style:text-properties officeooo:rsid="0055dfe9" officeooo:paragraph-rsid="0059e45b"/>
    </style:style>
    <style:style style:name="P13" style:family="paragraph" style:parent-style-name="Table_20_Contents">
      <style:text-properties officeooo:paragraph-rsid="005f4407"/>
    </style:style>
    <style:style style:name="P14" style:family="paragraph" style:parent-style-name="Table_20_Contents">
      <style:text-properties officeooo:rsid="0013e12e" officeooo:paragraph-rsid="005f4407"/>
    </style:style>
    <style:style style:name="P15" style:family="paragraph" style:parent-style-name="Table_20_Contents">
      <style:text-properties officeooo:rsid="006940bb" officeooo:paragraph-rsid="006940bb"/>
    </style:style>
    <style:style style:name="P16" style:family="paragraph" style:parent-style-name="Table_20_Contents">
      <style:text-properties officeooo:rsid="006e4ea6" officeooo:paragraph-rsid="006e4ea6"/>
    </style:style>
    <style:style style:name="P17" style:family="paragraph" style:parent-style-name="Table_20_Contents">
      <style:text-properties officeooo:rsid="00194b75" officeooo:paragraph-rsid="00194b75"/>
    </style:style>
    <style:style style:name="P18" style:family="paragraph" style:parent-style-name="Table_20_Contents">
      <style:text-properties officeooo:rsid="007d3d18" officeooo:paragraph-rsid="007d3d18"/>
    </style:style>
    <style:style style:name="P19" style:family="paragraph" style:parent-style-name="Table_20_Contents">
      <style:text-properties officeooo:rsid="0086670b" officeooo:paragraph-rsid="0086670b"/>
    </style:style>
    <style:style style:name="P20" style:family="paragraph" style:parent-style-name="Table_20_Contents">
      <style:text-properties officeooo:rsid="00194b75" officeooo:paragraph-rsid="007d3842"/>
    </style:style>
    <style:style style:name="P21" style:family="paragraph" style:parent-style-name="Table_20_Contents">
      <style:text-properties officeooo:rsid="001fd477" officeooo:paragraph-rsid="001fd477"/>
    </style:style>
    <style:style style:name="P22" style:family="paragraph" style:parent-style-name="Table_20_Contents">
      <style:text-properties officeooo:rsid="00933917" officeooo:paragraph-rsid="00933917"/>
    </style:style>
    <style:style style:name="P23" style:family="paragraph" style:parent-style-name="Table_20_Contents">
      <style:text-properties officeooo:paragraph-rsid="0094e345"/>
    </style:style>
    <style:style style:name="P24" style:family="paragraph" style:parent-style-name="Table_20_Contents">
      <style:text-properties officeooo:rsid="0094e345" officeooo:paragraph-rsid="0094e345"/>
    </style:style>
    <style:style style:name="P25" style:family="paragraph" style:parent-style-name="Table_20_Contents">
      <style:text-properties officeooo:rsid="00200a2b" officeooo:paragraph-rsid="009657ee"/>
    </style:style>
    <style:style style:name="P26" style:family="paragraph" style:parent-style-name="Table_20_Contents">
      <style:text-properties officeooo:rsid="00a29770" officeooo:paragraph-rsid="00a29770"/>
    </style:style>
    <style:style style:name="P27" style:family="paragraph" style:parent-style-name="Table_20_Contents">
      <style:text-properties officeooo:rsid="001fd477" officeooo:paragraph-rsid="00200a2b"/>
    </style:style>
    <style:style style:name="P28" style:family="paragraph" style:parent-style-name="Table_20_Contents">
      <style:text-properties officeooo:rsid="00a3785a" officeooo:paragraph-rsid="00a3785a"/>
    </style:style>
    <style:style style:name="P29" style:family="paragraph" style:parent-style-name="Table_20_Contents">
      <style:text-properties officeooo:rsid="00a4ee1a" officeooo:paragraph-rsid="00a4ee1a"/>
    </style:style>
    <style:style style:name="P30" style:family="paragraph" style:parent-style-name="Table_20_Contents">
      <style:text-properties officeooo:rsid="00a526c9" officeooo:paragraph-rsid="00a526c9"/>
    </style:style>
    <style:style style:name="P31" style:family="paragraph" style:parent-style-name="Table_20_Contents">
      <style:text-properties officeooo:rsid="00a53f0c" officeooo:paragraph-rsid="00a53f0c"/>
    </style:style>
    <style:style style:name="P32" style:family="paragraph" style:parent-style-name="Table_20_Contents">
      <style:text-properties officeooo:rsid="00a59913" officeooo:paragraph-rsid="00a59913"/>
    </style:style>
    <style:style style:name="P33" style:family="paragraph" style:parent-style-name="Table_20_Contents">
      <style:text-properties officeooo:rsid="00a87b7b" officeooo:paragraph-rsid="00a87b7b"/>
    </style:style>
    <style:style style:name="P34" style:family="paragraph" style:parent-style-name="Table_20_Contents">
      <style:text-properties officeooo:rsid="00a9d7bf" officeooo:paragraph-rsid="00a9d7bf"/>
    </style:style>
    <style:style style:name="P35" style:family="paragraph" style:parent-style-name="Table_20_Contents">
      <style:text-properties officeooo:rsid="00aa4647" officeooo:paragraph-rsid="00aa4647"/>
    </style:style>
    <style:style style:name="P36" style:family="paragraph" style:parent-style-name="Table_20_Contents">
      <style:text-properties officeooo:rsid="00ad4a9c" officeooo:paragraph-rsid="00ad4a9c"/>
    </style:style>
    <style:style style:name="P37" style:family="paragraph" style:parent-style-name="Table_20_Contents">
      <style:text-properties officeooo:rsid="002b4e5a" officeooo:paragraph-rsid="0024c30f"/>
    </style:style>
    <style:style style:name="P38" style:family="paragraph" style:parent-style-name="Table_20_Contents">
      <style:text-properties officeooo:rsid="00d5ba8f" officeooo:paragraph-rsid="00d5ba8f"/>
    </style:style>
    <style:style style:name="T1" style:family="text">
      <style:text-properties officeooo:rsid="001b6d36"/>
    </style:style>
    <style:style style:name="T2" style:family="text">
      <style:text-properties officeooo:rsid="001cea50"/>
    </style:style>
    <style:style style:name="T3" style:family="text">
      <style:text-properties fo:color="#127622" loext:opacity="100%"/>
    </style:style>
    <style:style style:name="T4" style:family="text">
      <style:text-properties officeooo:rsid="0036fa9d"/>
    </style:style>
    <style:style style:name="T5" style:family="text">
      <style:text-properties officeooo:rsid="0039ec71"/>
    </style:style>
    <style:style style:name="T6" style:family="text">
      <style:text-properties officeooo:rsid="003a2dc9"/>
    </style:style>
    <style:style style:name="T7" style:family="text">
      <style:text-properties officeooo:rsid="003b3573"/>
    </style:style>
    <style:style style:name="T8" style:family="text">
      <style:text-properties fo:color="#127622" loext:opacity="100%" officeooo:rsid="0036fa9d"/>
    </style:style>
    <style:style style:name="T9" style:family="text">
      <style:text-properties fo:color="#127622" loext:opacity="100%" officeooo:rsid="0037fced"/>
    </style:style>
    <style:style style:name="T10" style:family="text">
      <style:text-properties officeooo:rsid="0042c59f"/>
    </style:style>
    <style:style style:name="T11" style:family="text">
      <style:text-properties officeooo:rsid="0044febd"/>
    </style:style>
    <style:style style:name="T12" style:family="text">
      <style:text-properties officeooo:rsid="00b4329b"/>
    </style:style>
    <style:style style:name="T13" style:family="text">
      <style:text-properties officeooo:rsid="003fc766"/>
    </style:style>
    <style:style style:name="T14" style:family="text">
      <style:text-properties style:text-position="33% 80%"/>
    </style:style>
    <style:style style:name="T15" style:family="text">
      <style:text-properties officeooo:rsid="004e7000"/>
    </style:style>
    <style:style style:name="T16" style:family="text">
      <style:text-properties officeooo:rsid="004c3c82"/>
    </style:style>
    <style:style style:name="T17" style:family="text">
      <style:text-properties officeooo:rsid="004e86b1"/>
    </style:style>
    <style:style style:name="T18" style:family="text">
      <style:text-properties officeooo:rsid="00501e17"/>
    </style:style>
    <style:style style:name="T19" style:family="text">
      <style:text-properties fo:background-color="#fff5ce" loext:char-shading-value="0"/>
    </style:style>
    <style:style style:name="T20" style:family="text">
      <style:text-properties officeooo:rsid="0059e45b"/>
    </style:style>
    <style:style style:name="T21" style:family="text">
      <style:text-properties officeooo:rsid="0065e000"/>
    </style:style>
    <style:style style:name="T22" style:family="text">
      <style:text-properties officeooo:rsid="009cffa8"/>
    </style:style>
    <style:style style:name="T23" style:family="text">
      <style:text-properties fo:color="#127622" loext:opacity="100%" officeooo:rsid="0078f296"/>
    </style:style>
    <style:style style:name="T24" style:family="text">
      <style:text-properties officeooo:rsid="00b077fb"/>
    </style:style>
    <style:style style:name="T25" style:family="text">
      <style:text-properties officeooo:rsid="00b05db2"/>
    </style:style>
    <style:style style:name="T26" style:family="text">
      <style:text-properties fo:color="#127622" loext:opacity="100%" officeooo:rsid="00b05db2"/>
    </style:style>
    <style:style style:name="T27" style:family="text">
      <style:text-properties officeooo:rsid="00b8cd7d"/>
    </style:style>
    <style:style style:name="T28" style:family="text">
      <style:text-properties officeooo:rsid="00b55123"/>
    </style:style>
    <style:style style:name="T29" style:family="text">
      <style:text-properties officeooo:rsid="00bbd4d5"/>
    </style:style>
    <style:style style:name="T30" style:family="text">
      <style:text-properties officeooo:rsid="00bcb9f8"/>
    </style:style>
    <style:style style:name="T31" style:family="text">
      <style:text-properties officeooo:rsid="006a95bb"/>
    </style:style>
    <style:style style:name="T32" style:family="text">
      <style:text-properties officeooo:rsid="006c4fe4"/>
    </style:style>
    <style:style style:name="T33" style:family="text">
      <style:text-properties officeooo:rsid="0013e12e"/>
    </style:style>
    <style:style style:name="T34" style:family="text">
      <style:text-properties officeooo:rsid="0056ea83"/>
    </style:style>
    <style:style style:name="T35" style:family="text">
      <style:text-properties officeooo:rsid="005d4743"/>
    </style:style>
    <style:style style:name="T36" style:family="text">
      <style:text-properties officeooo:rsid="006d4627"/>
    </style:style>
    <style:style style:name="T37" style:family="text">
      <style:text-properties officeooo:rsid="0060b161"/>
    </style:style>
    <style:style style:name="T38" style:family="text">
      <style:text-properties officeooo:rsid="006e3b55"/>
    </style:style>
    <style:style style:name="T39" style:family="text">
      <style:text-properties officeooo:rsid="00724add"/>
    </style:style>
    <style:style style:name="T40" style:family="text">
      <style:text-properties officeooo:rsid="00756241"/>
    </style:style>
    <style:style style:name="T41" style:family="text">
      <style:text-properties officeooo:rsid="0078d84c"/>
    </style:style>
    <style:style style:name="T42" style:family="text">
      <style:text-properties officeooo:rsid="00772b5a"/>
    </style:style>
    <style:style style:name="T43" style:family="text">
      <style:text-properties officeooo:rsid="009f092c"/>
    </style:style>
    <style:style style:name="T44" style:family="text">
      <style:text-properties officeooo:rsid="00a0d5c8"/>
    </style:style>
    <style:style style:name="T45" style:family="text">
      <style:text-properties officeooo:rsid="00a1902f"/>
    </style:style>
    <style:style style:name="T46" style:family="text">
      <style:text-properties officeooo:rsid="006f3435"/>
    </style:style>
    <style:style style:name="T47" style:family="text">
      <style:text-properties officeooo:rsid="0070a2af"/>
    </style:style>
    <style:style style:name="T48" style:family="text">
      <style:text-properties officeooo:rsid="0071f474"/>
    </style:style>
    <style:style style:name="T49" style:family="text">
      <style:text-properties fo:color="#127622" loext:opacity="100%" officeooo:rsid="0089fc3d"/>
    </style:style>
    <style:style style:name="T50" style:family="text">
      <style:text-properties officeooo:rsid="007ff14d"/>
    </style:style>
    <style:style style:name="T51" style:family="text">
      <style:text-properties officeooo:rsid="00bf1686"/>
    </style:style>
    <style:style style:name="T52" style:family="text">
      <style:text-properties officeooo:rsid="007e498a"/>
    </style:style>
    <style:style style:name="T53" style:family="text">
      <style:text-properties officeooo:rsid="0083bf6d"/>
    </style:style>
    <style:style style:name="T54" style:family="text">
      <style:text-properties fo:color="#127622" loext:opacity="100%" officeooo:rsid="0083bf6d"/>
    </style:style>
    <style:style style:name="T55" style:family="text">
      <style:text-properties officeooo:rsid="00804e17"/>
    </style:style>
    <style:style style:name="T56" style:family="text">
      <style:text-properties officeooo:rsid="00857acd"/>
    </style:style>
    <style:style style:name="T57" style:family="text">
      <style:text-properties officeooo:rsid="0086670b"/>
    </style:style>
    <style:style style:name="T58" style:family="text">
      <style:text-properties officeooo:rsid="0081f6fe"/>
    </style:style>
    <style:style style:name="T59" style:family="text">
      <style:text-properties officeooo:rsid="00c077ef"/>
    </style:style>
    <style:style style:name="T60" style:family="text">
      <style:text-properties officeooo:rsid="0089012a"/>
    </style:style>
    <style:style style:name="T61" style:family="text">
      <style:text-properties officeooo:rsid="0089a815"/>
    </style:style>
    <style:style style:name="T62" style:family="text">
      <style:text-properties officeooo:rsid="008f0695"/>
    </style:style>
    <style:style style:name="T63" style:family="text">
      <style:text-properties officeooo:rsid="00c4bef4"/>
    </style:style>
    <style:style style:name="T64" style:family="text">
      <style:text-properties officeooo:rsid="00c6bab5"/>
    </style:style>
    <style:style style:name="T65" style:family="text">
      <style:text-properties officeooo:rsid="00c29345"/>
    </style:style>
    <style:style style:name="T66" style:family="text">
      <style:text-properties officeooo:rsid="00c75de1"/>
    </style:style>
    <style:style style:name="T67" style:family="text">
      <style:text-properties officeooo:rsid="008da313"/>
    </style:style>
    <style:style style:name="T68" style:family="text">
      <style:text-properties officeooo:rsid="00194b75"/>
    </style:style>
    <style:style style:name="T69" style:family="text">
      <style:text-properties officeooo:rsid="003179cd"/>
    </style:style>
    <style:style style:name="T70" style:family="text">
      <style:text-properties officeooo:rsid="00c90dda"/>
    </style:style>
    <style:style style:name="T71" style:family="text">
      <style:text-properties officeooo:rsid="00cc4a00"/>
    </style:style>
    <style:style style:name="T72" style:family="text">
      <style:text-properties officeooo:rsid="00c9d71c"/>
    </style:style>
    <style:style style:name="T73" style:family="text">
      <style:text-properties fo:color="#127622" loext:opacity="100%" officeooo:rsid="00c9d71c"/>
    </style:style>
    <style:style style:name="T74" style:family="text">
      <style:text-properties fo:color="#127622" loext:opacity="100%" officeooo:rsid="00cb9a9d"/>
    </style:style>
    <style:style style:name="T75" style:family="text">
      <style:text-properties officeooo:rsid="0091f407"/>
    </style:style>
    <style:style style:name="T76" style:family="text">
      <style:text-properties officeooo:rsid="008ca3c3"/>
    </style:style>
    <style:style style:name="T77" style:family="text">
      <style:text-properties fo:color="#127622" loext:opacity="100%" officeooo:rsid="008ca3c3"/>
    </style:style>
    <style:style style:name="T78" style:family="text">
      <style:text-properties officeooo:rsid="009657ee"/>
    </style:style>
    <style:style style:name="T79" style:family="text">
      <style:text-properties officeooo:rsid="0098a3b1"/>
    </style:style>
    <style:style style:name="T80" style:family="text">
      <style:text-properties fo:color="#127622" loext:opacity="100%" officeooo:rsid="009b2b07"/>
    </style:style>
    <style:style style:name="T81" style:family="text">
      <style:text-properties officeooo:rsid="0094e345"/>
    </style:style>
    <style:style style:name="T82" style:family="text">
      <style:text-properties officeooo:rsid="0098ffeb"/>
    </style:style>
    <style:style style:name="T83" style:family="text">
      <style:text-properties fo:color="#127622" loext:opacity="100%" officeooo:rsid="0098ffeb"/>
    </style:style>
    <style:style style:name="T84" style:family="text">
      <style:text-properties fo:color="#127622" loext:opacity="100%" officeooo:rsid="0099dbd6"/>
    </style:style>
    <style:style style:name="T85" style:family="text">
      <style:text-properties officeooo:rsid="00a23fe7"/>
    </style:style>
    <style:style style:name="T86" style:family="text">
      <style:text-properties fo:color="#127622" loext:opacity="100%" officeooo:rsid="0094e345"/>
    </style:style>
    <style:style style:name="T87" style:family="text">
      <style:text-properties officeooo:rsid="009b2b07"/>
    </style:style>
    <style:style style:name="T88" style:family="text">
      <style:text-properties officeooo:rsid="00acd3ba"/>
    </style:style>
    <style:style style:name="T89" style:family="text">
      <style:text-properties officeooo:rsid="00ce369c"/>
    </style:style>
    <style:style style:name="T90" style:family="text">
      <style:text-properties officeooo:rsid="00d423b6"/>
    </style:style>
    <style:style style:name="T91" style:family="text">
      <style:text-properties officeooo:rsid="00d4809d"/>
    </style:style>
    <style:style style:name="T92" style:family="text">
      <style:text-properties officeooo:rsid="00a74729"/>
    </style:style>
    <style:style style:name="T93" style:family="text">
      <style:text-properties officeooo:rsid="00d58095"/>
    </style:style>
    <style:style style:name="T94" style:family="text">
      <style:text-properties officeooo:rsid="00d704ba"/>
    </style:style>
    <style:style style:name="T95" style:family="text">
      <style:text-properties officeooo:rsid="00d86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Zorn sermon <text:span text:style-name="T1">(2025-11-26) “</text:span><text:span text:style-name="T2">Missing the will of the Lord”</text:span></text:p>
      <text:p text:style-name="Table_20_Contents"><text:a xlink:type="simple" xlink:href="https://www.youtube.com/watch?v=CrBaLn2dluY" text:style-name="Internet_20_link" text:visited-style-name="Visited_20_Internet_20_Link">https://www.youtube.com/watch?v=CrBaLn2dluY</text:a></text:p>
      <text:p text:style-name="P2"/>
      <text:p text:style-name="Table_20_Contents">In <text:span text:style-name="T3">Acts 15</text:span> there is a dispute <text:span text:style-name="T4">that arises that the apostles and elders at Jerusalem needed to settle that was started by men that came down from Judaea </text:span><text:span text:style-name="T5">to Antioch </text:span><text:span text:style-name="T4">and taught </text:span><text:span text:style-name="T6">the brethren there that</text:span><text:span text:style-name="T4"> unless the</text:span><text:span text:style-name="T6">y </text:span><text:span text:style-name="T4">be circumcised, they </text:span><text:span text:style-name="T7">could not</text:span><text:span text:style-name="T4"> be saved.</text:span></text:p>
      <text:p text:style-name="Table_20_Contents"/>
      <text:p text:style-name="P3"><text:span text:style-name="T4">Read </text:span><text:span text:style-name="T8">Acts 15:1-</text:span><text:span text:style-name="T9">35</text:span>.</text:p>
      <text:p text:style-name="P4"/>
      <text:p text:style-name="P5"><text:span text:style-name="T10">If you weren’t already aware, c</text:span>ircumcision is <text:span text:style-name="T11">a command</text:span><text:span text:style-name="T10"> in</text:span> the Law <text:span text:style-name="T11">both for the Jew and the Gentile </text:span><text:span text:style-name="T12">that sojourned among them that wanted to keep the passover</text:span>:</text:p>
      <text:p text:style-name="P5"/>
      <table:table table:name="Table13" table:style-name="Table13">
        <table:table-column table:style-name="Table13.A"/>
        <table:table-row>
          <table:table-cell table:style-name="Table13.A1" office:value-type="string">
            <text:p text:style-name="Table_20_Contents"><text:span text:style-name="T3">Leviticus 12:1-3</text:span> <text:span text:style-name="T13">(Hebrew/Jew)</text:span><text:line-break/><text:span text:style-name="T14">1</text:span> And the LORD spake unto Moses, saying, <text:span text:style-name="T14">2</text:span> Speak unto the children of Israel, saying, If a woman have conceived seed, and born a man child: then she shall be unclean seven days; according to the days of the separation for her infirmity shall she be unclean. <text:span text:style-name="T14">3</text:span> And in the eighth day the flesh of his foreskin shall be circumcised.</text:p>
          </table:table-cell>
        </table:table-row>
        <table:table-row>
          <table:table-cell table:style-name="Table13.A2" office:value-type="string">
            <text:p text:style-name="Table_20_Contents"><text:span text:style-name="T3">Exodus 12:48-49</text:span> <text:span text:style-name="T15">(Gentile)</text:span><text:line-break/><text:span text:style-name="T14">48</text:span> And when a stranger shall sojourn with thee, and will keep the passover to the LORD, let all his males be circumcised, and then let him come near and keep it; and he shall be as one that is born in the land: for no uncircumcised person shall eat thereof. <text:span text:style-name="T14">49</text:span> One law shall be to him that is homeborn, and unto the stranger that sojourneth among you.</text:p>
          </table:table-cell>
        </table:table-row>
      </table:table>
      <text:p text:style-name="P5"/>
      <text:p text:style-name="P6"><text:span text:style-name="T16">Circumcision</text:span> is a symbol of the covenant between God &amp; Abraham <text:span text:style-name="T16">and </text:span>nowhere in the word of God <text:span text:style-name="T16">is it</text:span> <text:span text:style-name="T17">ever </text:span>directly tied to salvation <text:span text:style-name="T16">which is </text:span><text:span text:style-name="T18">instead solely</text:span><text:span text:style-name="T16"> by grace through faith as it always has been and always will be.</text:span></text:p>
      <text:p text:style-name="P5"/>
      <table:table table:name="Table12" table:style-name="Table12">
        <table:table-column table:style-name="Table12.A"/>
        <table:table-row>
          <table:table-cell table:style-name="Table12.A1" office:value-type="string">
            <text:p text:style-name="Table_20_Contents"><text:span text:style-name="T3">Romans 6:14-15</text:span><text:line-break/>14 For sin shall not have dominion over you: for <text:span text:style-name="T19">ye are not under the law</text:span>, but under grace.<text:line-break/>15 What then? shall we sin, because <text:span text:style-name="T19">we are not under the law</text:span>, but under grace? God forbid.</text:p>
          </table:table-cell>
        </table:table-row>
        <table:table-row>
          <table:table-cell table:style-name="Table12.A2" office:value-type="string">
            <text:p text:style-name="Table_20_Contents"><text:span text:style-name="T3">Romans 10:4</text:span><text:line-break/>For Christ is the end of the law for righteousness to every one that believeth.</text:p>
          </table:table-cell>
        </table:table-row>
      </table:table>
      <text:p text:style-name="P7"/>
      <text:p text:style-name="P8">Fast forward a little to Paul’s second missionary journey:</text:p>
      <text:p text:style-name="P2"/>
      <table:table table:name="Table10" table:style-name="Table10">
        <table:table-column table:style-name="Table10.A"/>
        <table:table-row>
          <table:table-cell table:style-name="Table10.A1" office:value-type="string">
            <text:p text:style-name="Table_20_Contents"><text:span text:style-name="T3">Acts 18:1-6</text:span> (Paul, Silas, and later Timothy &amp; Luke)<text:line-break/>1 After these things Paul departed from Athens, and came to Corinth;<text:line-break/>2 And found a certain Jew named Aquila, born in Pontus, lately come from Italy, with his wife Priscilla; (because that Claudius had commanded all Jews to depart from Rome:) and came unto them.<text:line-break/>3 And because he was of the same craft, he abode with them, and wrought: for by their occupation they were tentmakers.<text:line-break/>4 And he reasoned in the synagogue every sabbath, and persuaded the Jews and the Greeks.<text:line-break/>5 And when Silas and Timotheus were come from Macedonia, Paul was pressed in the spirit, and testified to the Jews that Jesus was Christ.<text:line-break/>6 And when they opposed themselves, and blasphemed, he shook his raiment, and said unto them, Your blood be upon your own heads; I am clean: <text:span text:style-name="T19">from henceforth I will go unto the Gentiles</text:span>.</text:p>
          </table:table-cell>
        </table:table-row>
      </table:table>
      <text:p text:style-name="P2"/>
      <text:p text:style-name="P9"/>
      <text:p text:style-name="P9"/>
      <text:p text:style-name="P9"><text:soft-page-break/>However, Paul had <text:span text:style-name="T20">a bit of a problem </text:span><text:span text:style-name="T21">(the same problem we all have, </text:span><text:span text:style-name="T22">that is, our flesh</text:span><text:span text:style-name="T21">; </text:span><text:span text:style-name="T23">Romans 7:18-25, 8:6</text:span><text:span text:style-name="T21">). </text:span><text:span text:style-name="T24">Paul’s</text:span><text:span text:style-name="T25"> own desire for his kinsman to be saved (</text:span><text:span text:style-name="T26">Romans 9:2,3</text:span><text:span text:style-name="T25">) </text:span><text:span text:style-name="T27">and what it caused him to do </text:span><text:span text:style-name="T28">was a good thing </text:span><text:span text:style-name="T29">done </text:span><text:span text:style-name="T27">at the wrong time </text:span><text:span text:style-name="T29">in the wrong way because it was out of the will of God</text:span><text:span text:style-name="T27">.</text:span><text:span text:style-name="T28"> </text:span><text:span text:style-name="T27">There are many good things that we can do in life but are we doing them </text:span><text:span text:style-name="T30">according to the will of the Lord?</text:span></text:p>
      <text:p text:style-name="P9"/>
      <table:table table:name="Table1" table:style-name="Table1">
        <table:table-column table:style-name="Table1.A"/>
        <table:table-row>
          <table:table-cell table:style-name="Table1.A1" office:value-type="string">
            <text:p text:style-name="P10"><text:span text:style-name="T3">Acts 20:17-23</text:span><text:line-break/>17 And from Miletus he sent to Ephesus, and called the elders of the church.<text:line-break/>18 And when they were come to him, he said unto them, Ye know, from the first day that I came into Asia, after what manner I have been with you at all seasons,<text:line-break/>19 Serving the Lord with all humility of mind, and with many tears, and temptations, which befell me by the lying in wait of the Jews:<text:line-break/>20 And how I kept back nothing that was profitable unto you, but have shewed you, and have taught you publickly, and from house to house,<text:line-break/>21 Testifying both to the Jews, and also to the Greeks, repentance toward God, and faith toward our Lord Jesus Christ.<text:line-break/>22 And now, behold, I go <text:span text:style-name="T19">bound in the spirit</text:span> unto Jerusalem, not knowing the things that shall befall me there:<text:line-break/>23 Save that the Holy Ghost witnesseth in every city, saying that bonds and afflictions abide me.</text:p>
          </table:table-cell>
        </table:table-row>
      </table:table>
      <text:p text:style-name="P11"/>
      <text:p text:style-name="P12"><text:span text:style-name="T31">Wait, what happened to going to the Gentiles? </text:span><text:span text:style-name="T32">Paul’s</text:span> <text:span text:style-name="T33">desire to see his brethren </text:span>the Jews <text:span text:style-name="T33">saved constrains him from doing the will of the Lord </text:span><text:span text:style-name="T34">and he leaves off the Gentiles and heads for Jerusalem</text:span><text:span text:style-name="T35">. </text:span><text:span text:style-name="T36">In Tyre, o</text:span><text:span text:style-name="T37">n his way to Jerusalem he is warned by the Holy Ghost to not go up to Jerusalem:</text:span></text:p>
      <text:p text:style-name="P9"/>
      <table:table table:name="Table2" table:style-name="Table2">
        <table:table-column table:style-name="Table2.A"/>
        <table:table-row>
          <table:table-cell table:style-name="Table2.A1" office:value-type="string">
            <text:p text:style-name="P13"><text:span text:style-name="T3">Acts 21:3-4</text:span><text:line-break/>3 Now when we had discovered Cyprus, we left it on the left hand, and sailed into Syria, and landed at Tyre: for there the ship was to unlade her burden.<text:line-break/>4 And finding disciples, we tarried there seven days: <text:span text:style-name="T19">who said to Paul through the Spirit</text:span>, <text:span text:style-name="T19">that he should not go up to Jerusalem</text:span>.</text:p>
          </table:table-cell>
        </table:table-row>
      </table:table>
      <text:p text:style-name="P14"/>
      <text:p text:style-name="P15">Not heeding that warning, Paul <text:span text:style-name="T38">continues onward</text:span> to Caesarea <text:span text:style-name="T39">Philippi</text:span> to Philip the evangelists house.</text:p>
      <text:p text:style-name="P15"/>
      <table:table table:name="Table15" table:style-name="Table15">
        <table:table-column table:style-name="Table15.A"/>
        <table:table-row>
          <table:table-cell table:style-name="Table15.A1" office:value-type="string">
            <text:p text:style-name="Table_20_Contents"><text:span text:style-name="T3">Acts 21:8-12</text:span><text:line-break/>8 And the next day we that were of Paul's company departed, and came unto Caesarea: and we entered into the house of Philip the evangelist, which was one of the seven; and abode with him.<text:line-break/>9 And the same man had four daughters, virgins, which did prophesy.<text:line-break/>10 And as we tarried there many days, there came down from Judaea a certain prophet, named Agabus.<text:line-break/>11 And when he was come unto us, he took Paul's girdle, and bound his own hands and feet, and said, Thus saith the Holy Ghost, So shall the Jews at Jerusalem bind the man that owneth this girdle, and <text:span text:style-name="T19">shall deliver him into the hands of the Gentiles</text:span>.<text:line-break/>12 And when we heard these things, both we, and they of that place, besought him not to go up to Jerusalem.</text:p>
          </table:table-cell>
        </table:table-row>
      </table:table>
      <text:p text:style-name="P15"/>
      <text:p text:style-name="P16"><text:span text:style-name="T40">Paul’s friends try to warn him </text:span><text:span text:style-name="T41">also </text:span><text:span text:style-name="T40">but </text:span><text:span text:style-name="T42">he is determined </text:span><text:span text:style-name="T43">to do things his way</text:span><text:span text:style-name="T40">. </text:span><text:span text:style-name="T44">However, the Lord hath spoken </text:span><text:span text:style-name="T45">by the hand of Agabus </text:span><text:span text:style-name="T44">and o</text:span>ne way or another, Paul is going to the Gentiles. He <text:span text:style-name="T46">could have gone</text:span> willingly <text:span text:style-name="T47">but because he chose his own way,</text:span> now he <text:span text:style-name="T48">will</text:span> go <text:span text:style-name="T48">to them</text:span> bound hand and feet.</text:p>
      <text:p text:style-name="P14"/>
      <text:p text:style-name="P17"/>
      <text:p text:style-name="P17"/>
      <text:p text:style-name="P17"/>
      <text:p text:style-name="P17"/>
      <text:p text:style-name="P17"/>
      <table:table table:name="Table4" table:style-name="Table4">
        <table:table-column table:style-name="Table4.A"/>
        <text:soft-page-break/>
        <table:table-row>
          <table:table-cell table:style-name="Table4.A1" office:value-type="string">
            <text:p text:style-name="Table_20_Contents"><text:span text:style-name="T3">Acts 21:17-2</text:span><text:span text:style-name="T49">4</text:span><text:line-break/>17 And when we were come to Jerusalem, the brethren received us gladly.<text:line-break/>18 And the day following Paul went in with us unto James; and all the elders were present.<text:line-break/>19 And when he had saluted them, he declared particularly what things God had wrought among the Gentiles by his ministry.<text:line-break/>20 And when they heard it, they glorified the Lord, and said unto him, Thou seest, brother, how many thousands of Jews there are which believe; and they are all zealous of the law:<text:line-break/>21 And they are informed of thee, <text:span text:style-name="T19">that thou teachest all the Jews which are among the Gentiles to forsake Moses</text:span>, saying that they ought not to circumcise their children, neither to walk after the customs.<text:line-break/>22 What is it therefore? the multitude must needs come together: for they will hear that thou art come.<text:line-break/>23 Do therefore this that we say to thee: We have four men which have a vow on them;<text:line-break/>24 Them take, and purify thyself with them, and be at charges with them, that they may shave their heads: and all may know that those things, whereof they were informed concerning thee, are nothing; but that thou thyself also walkest orderly, and <text:span text:style-name="T19">keepest the law</text:span>.</text:p>
          </table:table-cell>
        </table:table-row>
      </table:table>
      <text:p text:style-name="P17"/>
      <text:p text:style-name="P18">But, wait, didn’t we read at the beginning in <text:span text:style-name="T3">Acts 15</text:span> that James, Peter, and the apostles <text:span text:style-name="T50">and</text:span> elders <text:span text:style-name="T51">at</text:span> Jerusalem had determined that <text:span text:style-name="T52">keeping the law was unnecessary for salvation </text:span><text:span text:style-name="T53">(</text:span><text:span text:style-name="T54">Acts 15:10</text:span><text:span text:style-name="T53">)</text:span><text:span text:style-name="T52">? </text:span><text:span text:style-name="T55">They even sent Paul, Barnabas, Barsabas, Silas, and other chosen </text:span><text:span text:style-name="T56">men </text:span><text:span text:style-name="T55">to Antioch </text:span><text:span text:style-name="T57">in Syria </text:span><text:span text:style-name="T56">and Cilicia</text:span><text:span text:style-name="T55"> with letters to confirm their decision. </text:span><text:span text:style-name="T58">After Antioch Paul obviously continued onward with that same message </text:span><text:span text:style-name="T59">and we can read that and much more in his epistles. </text:span><text:span text:style-name="T60">So, what are these men now doing telling Paul to join these men that are keeping the law and to masquerade himself as one of them? </text:span><text:span text:style-name="T61">They’re asking him to compromise </text:span><text:span text:style-name="T62">with the Jews that </text:span><text:span text:style-name="T63">supposedly </text:span><text:span text:style-name="T62">believe but </text:span><text:span text:style-name="T64">at the same time </text:span><text:span text:style-name="T63">also </text:span><text:span text:style-name="T62">will discriminate </text:span><text:span text:style-name="T65">against those that don’t keep the law </text:span><text:span text:style-name="T63">contrary </text:span><text:span text:style-name="T66">even </text:span><text:span text:style-name="T63">to what </text:span><text:span text:style-name="T66">the law they profess to keep teaches.</text:span></text:p>
      <text:p text:style-name="P17"/>
      <text:p text:style-name="P19">And <text:span text:style-name="T67">in verse 26</text:span> we see the first cost of missing the will of the Lord: compromise. <text:span text:style-name="T68">Paul compromise</text:span>s<text:span text:style-name="T68"> his convictions </text:span><text:span text:style-name="T69">and his </text:span><text:span text:style-name="T68">conscience </text:span><text:span text:style-name="T70">to “keep the peace” with those that are disorderl</text:span><text:span text:style-name="T71">y with regards to the word of God</text:span><text:span text:style-name="T70"> </text:span><text:span text:style-name="T72">(</text:span><text:span text:style-name="T73">Mat 10:34, </text:span><text:span text:style-name="T74">15:9, Mar 7:7</text:span><text:span text:style-name="T72">)</text:span><text:span text:style-name="T75">.</text:span></text:p>
      <text:p text:style-name="P20"/>
      <table:table table:name="Table5" table:style-name="Table5">
        <table:table-column table:style-name="Table5.A"/>
        <table:table-row>
          <table:table-cell table:style-name="Table5.A1" office:value-type="string">
            <text:p text:style-name="Table_20_Contents"><text:span text:style-name="T3">Acts 21:25-26</text:span><text:line-break/>25 <text:span text:style-name="T76">(</text:span><text:span text:style-name="T77">Acts 10:34,35</text:span><text:span text:style-name="T76">)</text:span><text:line-break/>26 Then Paul took the men, and the next day purifying himself with them entered into the temple, to signify the accomplishment of the days of purification, until that an offering should be offered for every one of them.</text:p>
          </table:table-cell>
        </table:table-row>
      </table:table>
      <text:p text:style-name="P21"/>
      <text:p text:style-name="P22">Fast forward a little and we see another cost of missing the will of the Lord: time. Paul spends at least two years in jail being used <text:span text:style-name="T78">as </text:span>a political favor. <text:span text:style-name="T79">At least four years pass until the end of the book of Acts and Paul is either a prisoner or under house arrest until the end of it.</text:span></text:p>
      <text:p text:style-name="P22"/>
      <table:table table:name="Table6" table:style-name="Table6">
        <table:table-column table:style-name="Table6.A"/>
        <table:table-row>
          <table:table-cell table:style-name="Table6.A1" office:value-type="string">
            <text:p text:style-name="Table_20_Contents"><text:span text:style-name="T3">Acts 24:27</text:span> (<text:span text:style-name="T80">28:30</text:span>)<text:line-break/>But after <text:span text:style-name="T19">two years</text:span> Porcius Festus came into Felix' room: and Felix, willing to shew the Jews a pleasure, left Paul bound.</text:p>
          </table:table-cell>
        </table:table-row>
      </table:table>
      <text:p text:style-name="P21"/>
      <text:p text:style-name="P23"><text:span text:style-name="T81">Fast forward a little more and we see another cost of missing the will of the Lord: the storm of the century. </text:span><text:span text:style-name="T82">In </text:span><text:span text:style-name="T83">Acts</text:span><text:span text:style-name="T82"> chapter </text:span><text:span text:style-name="T83">27</text:span> and <text:span text:style-name="T84">28</text:span><text:span text:style-name="T82"> </text:span><text:span text:style-name="T81">Paul is on a prisoner ship bound for Rome and they get caught in an enormous storm </text:span><text:span text:style-name="T85">at sea</text:span><text:span text:style-name="T81"> for “many days” (</text:span><text:span text:style-name="T86">Acts 27:20</text:span><text:span text:style-name="T81">). </text:span><text:span text:style-name="T87">And shortly thereafter we see another cost of missing the will of the Lord: shipwrecked </text:span><text:span text:style-name="T88">in the cold and </text:span><text:span text:style-name="T89">in </text:span><text:span text:style-name="T88">the rain.</text:span></text:p>
      <text:p text:style-name="P24"/>
      <text:p text:style-name="P25"/>
      <text:p text:style-name="P25"/>
      <text:p text:style-name="P25"/>
      <text:p text:style-name="P25"/>
      <text:p text:style-name="P26"><text:soft-page-break/>And from the first time that Paul was warned not to go up to Jerusalem (when he landed in Tyre in <text:span text:style-name="T3">Acts 21:3</text:span>) and all along the journey back to Rome we see another cost of missing the will of the Lord: trouble.</text:p>
      <text:p text:style-name="P27"/>
      <table:table table:name="Table3" table:style-name="Table3">
        <table:table-column table:style-name="Table3.A"/>
        <table:table-column table:style-name="Table3.B"/>
        <table:table-row>
          <table:table-cell table:style-name="Table3.A1" office:value-type="string">
            <text:p text:style-name="P28">Acts 21:30-32</text:p>
          </table:table-cell>
          <table:table-cell table:style-name="Table3.B1" office:value-type="string">
            <text:p text:style-name="P28">Paul is beaten and the people intended to kill him before the centurions rescued him.</text:p>
          </table:table-cell>
        </table:table-row>
        <table:table-row>
          <table:table-cell table:style-name="Table3.A2" office:value-type="string">
            <text:p text:style-name="P29">Acts 21:33</text:p>
          </table:table-cell>
          <table:table-cell table:style-name="Table3.B2" office:value-type="string">
            <text:p text:style-name="P29">Paul is bound with not one, but two chains.</text:p>
          </table:table-cell>
        </table:table-row>
        <table:table-row>
          <table:table-cell table:style-name="Table3.A2" office:value-type="string">
            <text:p text:style-name="P30">Acts 22:24</text:p>
          </table:table-cell>
          <table:table-cell table:style-name="Table3.B2" office:value-type="string">
            <text:p text:style-name="P30">Paul was to be interrogated by scour<text:span text:style-name="T90">g</text:span>ing but he invoked his Roman citizenship to avoid that.</text:p>
          </table:table-cell>
        </table:table-row>
        <table:table-row>
          <table:table-cell table:style-name="Table3.A2" office:value-type="string">
            <text:p text:style-name="P31">Acts 23:1,2</text:p>
          </table:table-cell>
          <table:table-cell table:style-name="Table3.B2" office:value-type="string">
            <text:p text:style-name="P31">Paul is hit on the mouth <text:span text:style-name="T91">while </text:span>standing before the Sanhedrin.</text:p>
          </table:table-cell>
        </table:table-row>
        <table:table-row>
          <table:table-cell table:style-name="Table3.A2" office:value-type="string">
            <text:p text:style-name="P32">Acts 23:12,14,21</text:p>
          </table:table-cell>
          <table:table-cell table:style-name="Table3.B2" office:value-type="string">
            <text:p text:style-name="P32">More than 40 men swore an oath to <text:span text:style-name="T92">neither</text:span> eat <text:span text:style-name="T92">n</text:span>or drink until they had murdered Paul.</text:p>
          </table:table-cell>
        </table:table-row>
        <table:table-row>
          <table:table-cell table:style-name="Table3.A2" office:value-type="string">
            <text:p text:style-name="P33">Acts 23:35-24:27</text:p>
          </table:table-cell>
          <table:table-cell table:style-name="Table3.B2" office:value-type="string">
            <text:p text:style-name="P33">Paul spends more than 2 years in jail.</text:p>
          </table:table-cell>
        </table:table-row>
        <table:table-row>
          <table:table-cell table:style-name="Table3.A2" office:value-type="string">
            <text:p text:style-name="P34">Acts 25:3</text:p>
          </table:table-cell>
          <table:table-cell table:style-name="Table3.B2" office:value-type="string">
            <text:p text:style-name="P34">The high priest and the chief of the Jews plot to kill Paul again.</text:p>
          </table:table-cell>
        </table:table-row>
        <table:table-row>
          <table:table-cell table:style-name="Table3.A2" office:value-type="string">
            <text:p text:style-name="P35">Acts 28:3,4</text:p>
          </table:table-cell>
          <table:table-cell table:style-name="Table3.B2" office:value-type="string">
            <text:p text:style-name="P35"><text:span text:style-name="T93">On the isle of Melita, after being shipwrecked, </text:span>Paul is bitten by a viper.</text:p>
          </table:table-cell>
        </table:table-row>
        <table:table-row>
          <table:table-cell table:style-name="Table3.A2" office:value-type="string">
            <text:p text:style-name="P36">The end of the book of Acts</text:p>
          </table:table-cell>
          <table:table-cell table:style-name="Table3.B9" office:value-type="string">
            <text:p text:style-name="P36">Paul, a prisoner is kept under house arrest.</text:p>
          </table:table-cell>
        </table:table-row>
      </table:table>
      <text:p text:style-name="P37"/>
      <text:p text:style-name="P37"/>
      <text:p text:style-name="P38">The good news is that we serve a merciful God. And just like in the book of Jonah, God still used Paul and still uses us when we are out of His will. <text:span text:style-name="T94">But, </text:span><text:span text:style-name="T95">is sure it much nicer and easier if we do things His way.</text:span></text:p>
      <text:p text:style-name="P38"/>
      <text:p text:style-name="P38"/>
      <table:table table:name="Table7" table:style-name="Table7">
        <table:table-column table:style-name="Table7.A"/>
        <table:table-row>
          <table:table-cell table:style-name="Table7.A1" office:value-type="string">
            <text:p text:style-name="Table_20_Contents"><text:span text:style-name="T3">Ephesians 5:15-16</text:span><text:line-break/><text:span text:style-name="T14">15</text:span> See then that ye walk circumspectly, not as fools, but as wise, <text:span text:style-name="T14">16</text:span> Redeeming the time, because the days are evil.</text:p>
          </table:table-cell>
        </table:table-row>
      </table:table>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09:29:27.857824600</meta:creation-date>
    <dc:title>default</dc:title>
    <meta:editing-duration>PT4H58M46S</meta:editing-duration>
    <meta:editing-cycles>197</meta:editing-cycles>
    <meta:generator>LibreOffice/26.2.4.2$Linux_X86_64 LibreOffice_project/64a984c51f4702dbd3710b13428c673a2f1292e7</meta:generator>
    <meta:initial-creator>William K. McDannell Jr.</meta:initial-creator>
    <dc:date>2026-07-11T12:20:27.623950392</dc:date>
    <meta:document-statistic meta:table-count="11" meta:image-count="0" meta:object-count="0" meta:page-count="4" meta:paragraph-count="47" meta:word-count="1901" meta:character-count="10132" meta:non-whitespace-character-count="8278"/>
    <meta:template xlink:type="simple" xlink:actuate="onRequest" xlink:title="default" xlink:href="../../../../AppData/Roaming/LibreOffice/4/user/template/default.ott" meta:date="2025-12-09T09:29:27.382414400"/>
  </office:meta>
</office:document-meta>
</file>